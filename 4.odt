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41" style:master-page-name="MasterPage2" style:family="paragraph" style:name="P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9">
      <style:text-properties fo:color="#1f1f1f" fo:font-family="Arial" style:font-family-asian="Arial" style:font-family-complex="Arial" fo:font-size="14pt" fo:font-weight="bold"/>
    </style:style>
    <style:style style:family="paragraph" style:name="P34">
      <style:paragraph-properties fo:line-height="115%" fo:margin-left="0cm" fo:margin-right="0cm" fo:text-indent="0cm" fo:margin-top="0pt" fo:margin-bottom="0pt" fo:border="none"/>
      <style:text-properties/>
    </style:style>
    <style:style style:family="text" style:name="T150">
      <style:text-properties fo:color="#1f1f1f" fo:font-family="Arial" style:font-family-asian="Arial" style:font-family-complex="Arial" fo:font-size="12pt"/>
    </style:style>
    <style:style style:parent-style-name="142" style:family="paragraph" style:name="P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1">
      <style:text-properties fo:color="#1f1f1f" fo:font-family="Arial" style:font-family-asian="Arial" style:font-family-complex="Arial" fo:font-size="12pt" fo:font-weight="bold"/>
    </style:style>
    <style:style style:family="paragraph" style:name="P36">
      <style:paragraph-properties fo:line-height="115%" fo:margin-left="0cm" fo:margin-right="0cm" fo:text-indent="0cm" fo:margin-top="0pt" fo:margin-bottom="0pt" fo:border="none"/>
      <style:text-properties/>
    </style:style>
    <style:style style:family="text" style:name="T152">
      <style:text-properties fo:color="#1f1f1f" fo:font-family="Arial" style:font-family-asian="Arial" style:font-family-complex="Arial" fo:font-size="12pt"/>
    </style:style>
    <style:style style:parent-style-name="142" style:family="paragraph" style:name="P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3">
      <style:text-properties fo:color="#1f1f1f" fo:font-family="Arial" style:font-family-asian="Arial" style:font-family-complex="Arial" fo:font-size="12pt" fo:font-weight="bold"/>
    </style:style>
    <style:style style:family="paragraph" style:name="P38">
      <style:paragraph-properties fo:line-height="115%" fo:margin-left="0cm" fo:margin-right="0cm" fo:text-indent="0cm" fo:margin-top="0pt" fo:margin-bottom="0pt" fo:border="none"/>
      <style:text-properties/>
    </style:style>
    <style:style style:family="text" style:name="T154">
      <style:text-properties fo:color="#1f1f1f" fo:font-family="Arial" style:font-family-asian="Arial" style:font-family-complex="Arial" fo:font-size="12pt"/>
    </style:style>
    <style:style style:family="text" style:name="T155">
      <style:text-properties fo:color="#1f1f1f" fo:font-family="Arial" style:font-family-asian="Arial" style:font-family-complex="Arial" fo:font-size="12pt"/>
    </style:style>
    <style:style style:parent-style-name="142" style:family="paragraph" style:name="P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6">
      <style:text-properties fo:color="#1f1f1f" fo:font-family="Arial" style:font-family-asian="Arial" style:font-family-complex="Arial" fo:font-size="12pt" fo:font-weight="bold"/>
    </style:style>
    <style:style style:family="paragraph" style:name="P40">
      <style:paragraph-properties fo:line-height="115%" fo:margin-left="0cm" fo:margin-right="0cm" fo:text-indent="0cm" fo:margin-top="0pt" fo:margin-bottom="0pt" fo:border="none"/>
      <style:text-properties/>
    </style:style>
    <style:style style:family="text" style:name="T157">
      <style:text-properties fo:color="#1f1f1f" fo:font-family="Arial" style:font-family-asian="Arial" style:font-family-complex="Arial" fo:font-size="12pt"/>
    </style:style>
    <style:style style:parent-style-name="142" style:family="paragraph" style:name="P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8">
      <style:text-properties fo:color="#1f1f1f" fo:font-family="Arial" style:font-family-asian="Arial" style:font-family-complex="Arial" fo:font-size="12pt" fo:font-weight="bold"/>
    </style:style>
    <style:style style:family="paragraph" style:name="P42">
      <style:paragraph-properties fo:line-height="115%" fo:margin-left="0cm" fo:margin-right="0cm" fo:text-indent="0cm" fo:margin-top="0pt" fo:margin-bottom="0pt" fo:border="none"/>
      <style:text-properties/>
    </style:style>
    <style:style style:family="text" style:name="T159">
      <style:text-properties fo:color="#1f1f1f" fo:font-family="Arial" style:font-family-asian="Arial" style:font-family-complex="Arial" fo:font-size="12pt"/>
    </style:style>
    <style:style style:parent-style-name="141" style:family="paragraph" style:name="P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0">
      <style:text-properties fo:color="#1f1f1f" fo:font-family="Arial" style:font-family-asian="Arial" style:font-family-complex="Arial" fo:font-size="14pt" fo:font-weight="bold"/>
    </style:style>
    <style:style style:parent-style-name="668" style:list-style-name="WWNum1" style:family="paragraph" style:name="P44">
      <style:paragraph-properties fo:line-height="115%" fo:margin-right="0cm" fo:margin-top="0pt" fo:margin-bottom="0pt" fo:border="none"/>
      <style:text-properties/>
    </style:style>
    <style:style style:family="text" style:name="T161">
      <style:text-properties fo:color="#1f1f1f" fo:font-family="Arial" style:font-family-asian="Arial" style:font-family-complex="Arial" fo:font-size="12pt"/>
    </style:style>
    <style:style style:parent-style-name="668" style:list-style-name="WWNum1" style:family="paragraph" style:name="P45">
      <style:paragraph-properties fo:line-height="115%" fo:margin-right="0cm" fo:margin-top="0pt" fo:margin-bottom="0pt" fo:border="none"/>
      <style:text-properties/>
    </style:style>
    <style:style style:family="text" style:name="T162">
      <style:text-properties fo:color="#1f1f1f" fo:font-family="Arial" style:font-family-asian="Arial" style:font-family-complex="Arial" fo:font-size="12pt"/>
    </style:style>
    <style:style style:parent-style-name="668" style:list-style-name="WWNum1" style:family="paragraph" style:name="P46">
      <style:paragraph-properties fo:line-height="115%" fo:margin-right="0cm" fo:margin-top="0pt" fo:margin-bottom="0pt" fo:border="none"/>
      <style:text-properties/>
    </style:style>
    <style:style style:family="text" style:name="T163">
      <style:text-properties fo:color="#1f1f1f" fo:font-family="Arial" style:font-family-asian="Arial" style:font-family-complex="Arial" fo:font-size="12pt"/>
    </style:style>
    <style:style style:parent-style-name="668" style:list-style-name="WWNum1" style:family="paragraph" style:name="P47">
      <style:paragraph-properties fo:line-height="115%" fo:margin-right="0cm" fo:margin-top="0pt" fo:margin-bottom="0pt" fo:border="none"/>
      <style:text-properties/>
    </style:style>
    <style:style style:family="text" style:name="T164">
      <style:text-properties fo:color="#1f1f1f" fo:font-family="Arial" style:font-family-asian="Arial" style:font-family-complex="Arial" fo:font-size="12pt"/>
    </style:style>
    <style:style style:family="paragraph" style:name="P48">
      <style:paragraph-properties/>
      <style:text-properties/>
    </style:style>
    <style:style style:family="paragraph" style:name="P49">
      <style:paragraph-properties fo:line-height="115%" fo:margin-left="0cm" fo:margin-right="0cm" fo:text-indent="0cm" fo:margin-top="0pt" fo:margin-bottom="0pt" fo:break-before="page" fo:border="none"/>
      <style:text-properties/>
    </style:style>
    <style:style style:family="text" style:name="T165">
      <style:text-properties fo:color="#1f1f1f" fo:font-family="Arial" style:font-family-asian="Arial" style:font-family-complex="Arial" fo:font-size="12pt"/>
    </style:style>
    <style:style style:parent-style-name="141" style:family="paragraph" style:name="P5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6">
      <style:text-properties fo:color="#1f1f1f" fo:font-family="Arial" style:font-family-asian="Arial" style:font-family-complex="Arial" fo:font-size="14pt" fo:font-weight="bold"/>
    </style:style>
    <style:style style:family="paragraph" style:name="P51">
      <style:paragraph-properties fo:line-height="115%" fo:margin-left="0cm" fo:margin-right="0cm" fo:text-indent="0cm" fo:margin-top="0pt" fo:margin-bottom="0pt" fo:border="none"/>
      <style:text-properties/>
    </style:style>
    <style:style style:family="text" style:name="T167">
      <style:text-properties fo:color="#1f1f1f" fo:font-family="Arial" style:font-family-asian="Arial" style:font-family-complex="Arial" fo:font-size="12pt"/>
    </style:style>
    <style:style style:parent-style-name="142" style:family="paragraph" style:name="P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68">
      <style:text-properties fo:color="#1f1f1f" fo:font-family="Arial" style:font-family-asian="Arial" style:font-family-complex="Arial" fo:font-size="12pt" fo:font-weight="bold"/>
    </style:style>
    <style:style style:family="paragraph" style:name="P53">
      <style:paragraph-properties fo:line-height="115%" fo:margin-left="0cm" fo:margin-right="0cm" fo:text-indent="0cm" fo:margin-top="0pt" fo:margin-bottom="0pt" fo:border="none"/>
      <style:text-properties/>
    </style:style>
    <style:style style:family="text" style:name="T169">
      <style:text-properties fo:color="#1f1f1f" fo:font-family="Arial" style:font-family-asian="Arial" style:font-family-complex="Arial" fo:font-size="12pt"/>
    </style:style>
    <style:style style:family="text" style:name="T170">
      <style:text-properties fo:color="#1f1f1f" fo:font-family="Arial" style:font-family-asian="Arial" style:font-family-complex="Arial" fo:font-size="12pt"/>
    </style:style>
    <style:style style:parent-style-name="142" style:family="paragraph" style:name="P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71">
      <style:text-properties fo:color="#1f1f1f" fo:font-family="Arial" style:font-family-asian="Arial" style:font-family-complex="Arial" fo:font-size="12pt" fo:font-weight="bold"/>
    </style:style>
    <style:style style:family="paragraph" style:name="P55">
      <style:paragraph-properties fo:line-height="115%" fo:margin-left="0cm" fo:margin-right="0cm" fo:text-indent="0cm" fo:margin-top="0pt" fo:margin-bottom="0pt" fo:background-color="#000000" fo:border="none"/>
      <style:text-properties/>
    </style:style>
    <style:style style:family="text" style:name="T172">
      <style:text-properties fo:color="#ffffff" fo:font-family="Arial" style:font-family-asian="Arial" style:font-family-complex="Arial" fo:font-size="10.5pt"/>
    </style:style>
    <style:style style:family="paragraph" style:name="P56">
      <style:paragraph-properties fo:line-height="115%" fo:margin-left="0cm" fo:margin-right="0cm" fo:text-indent="0cm" fo:margin-top="0pt" fo:margin-bottom="0pt" fo:background-color="#000000" fo:border="none"/>
      <style:text-properties/>
    </style:style>
    <style:style style:family="text" style:name="T173">
      <style:text-properties fo:color="#ffffff" fo:font-family="Arial" style:font-family-asian="Arial" style:font-family-complex="Arial" fo:font-size="10.5pt"/>
    </style:style>
    <style:style style:family="paragraph" style:name="P57">
      <style:paragraph-properties fo:line-height="115%" fo:margin-left="0cm" fo:margin-right="0cm" fo:text-indent="0cm" fo:margin-top="0pt" fo:margin-bottom="0pt" fo:background-color="#000000" fo:border="none"/>
      <style:text-properties/>
    </style:style>
    <style:style style:family="text" style:name="T174">
      <style:text-properties fo:color="#ffffff" fo:font-family="Arial" style:font-family-asian="Arial" style:font-family-complex="Arial" fo:font-size="10.5pt"/>
    </style:style>
    <style:style style:family="paragraph" style:name="P58">
      <style:paragraph-properties fo:line-height="115%" fo:margin-left="0cm" fo:margin-right="0cm" fo:text-indent="0cm" fo:margin-top="0pt" fo:margin-bottom="0pt" fo:background-color="#000000" fo:border="none"/>
      <style:text-properties/>
    </style:style>
    <style:style style:family="text" style:name="T175">
      <style:text-properties fo:font-family="Arial" style:font-family-asian="Arial" style:font-family-complex="Arial" fo:font-size="12pt"/>
    </style:style>
    <style:style style:family="paragraph" style:name="P59">
      <style:paragraph-properties fo:line-height="115%" fo:margin-left="0cm" fo:margin-right="0cm" fo:text-indent="0cm" fo:margin-top="0pt" fo:margin-bottom="0pt" fo:border="none"/>
      <style:text-properties/>
    </style:style>
    <style:style style:family="text" style:name="T176">
      <style:text-properties fo:color="#1f1f1f" fo:font-family="Arial" style:font-family-asian="Arial" style:font-family-complex="Arial" fo:font-size="12pt"/>
    </style:style>
    <style:style style:parent-style-name="142" style:family="paragraph" style:name="P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77">
      <style:text-properties fo:color="#1f1f1f" fo:font-family="Arial" style:font-family-asian="Arial" style:font-family-complex="Arial" fo:font-size="12pt" fo:font-weight="bold"/>
    </style:style>
    <style:style style:parent-style-name="668" style:list-style-name="WWNum2" style:family="paragraph" style:name="P61">
      <style:paragraph-properties fo:line-height="115%" fo:margin-right="0cm" fo:margin-top="0pt" fo:margin-bottom="0pt" fo:border="none"/>
      <style:text-properties/>
    </style:style>
    <style:style style:family="text" style:name="T178">
      <style:text-properties fo:color="#1f1f1f" fo:font-family="Arial" style:font-family-asian="Arial" style:font-family-complex="Arial" fo:font-size="12pt" fo:font-weight="bold"/>
    </style:style>
    <style:style style:family="text" style:name="T179">
      <style:text-properties fo:color="#1f1f1f" fo:font-family="Arial" style:font-family-asian="Arial" style:font-family-complex="Arial" fo:font-size="12pt"/>
    </style:style>
    <style:style style:parent-style-name="668" style:list-style-name="WWNum2" style:family="paragraph" style:name="P62">
      <style:paragraph-properties fo:line-height="115%" fo:margin-right="0cm" fo:margin-top="0pt" fo:margin-bottom="0pt" fo:border="none"/>
      <style:text-properties/>
    </style:style>
    <style:style style:family="text" style:name="T180">
      <style:text-properties fo:color="#1f1f1f" fo:font-family="Arial" style:font-family-asian="Arial" style:font-family-complex="Arial" fo:font-size="12pt" fo:font-weight="bold"/>
    </style:style>
    <style:style style:family="text" style:name="T181">
      <style:text-properties fo:color="#1f1f1f" fo:font-family="Arial" style:font-family-asian="Arial" style:font-family-complex="Arial" fo:font-size="12pt"/>
    </style:style>
    <style:style style:parent-style-name="668" style:list-style-name="WWNum2" style:family="paragraph" style:name="P63">
      <style:paragraph-properties fo:line-height="115%" fo:margin-right="0cm" fo:margin-top="0pt" fo:margin-bottom="0pt" fo:border="none"/>
      <style:text-properties/>
    </style:style>
    <style:style style:family="text" style:name="T182">
      <style:text-properties fo:color="#1f1f1f" fo:font-family="Arial" style:font-family-asian="Arial" style:font-family-complex="Arial" fo:font-size="12pt" fo:font-weight="bold"/>
    </style:style>
    <style:style style:family="text" style:name="T183">
      <style:text-properties fo:color="#1f1f1f" fo:font-family="Arial" style:font-family-asian="Arial" style:font-family-complex="Arial" fo:font-size="12pt"/>
    </style:style>
    <style:style style:parent-style-name="142" style:family="paragraph" style:name="P6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84">
      <style:text-properties fo:color="#1f1f1f" fo:font-family="Arial" style:font-family-asian="Arial" style:font-family-complex="Arial" fo:font-size="12pt" fo:font-weight="bold"/>
    </style:style>
    <style:style style:family="table" style:name="ta1">
      <style:paragraph-properties fo:line-height="100%" fo:margin-bottom="0pt"/>
      <style:table-properties style:width="12.11cm" fo:margin-left="0cm" table:align="left" style:use-optimal-column-width="true"/>
    </style:style>
    <style:style style:family="table-column" style:name="co1">
      <style:table-column-properties style:column-width="1.565cm" style:use-optimal-column-width="true"/>
    </style:style>
    <style:style style:family="table-column" style:name="co2">
      <style:table-column-properties style:column-width="4.542cm" style:use-optimal-column-width="true"/>
    </style:style>
    <style:style style:family="table-column" style:name="co3">
      <style:table-column-properties style:column-width="5.999cm" style:use-optimal-column-width="true"/>
    </style:style>
    <style:style style:family="table-row" style:name="ro1">
      <style:table-row-properties/>
    </style:style>
    <style:style style:family="table-cell" style:name="ce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5">
      <style:paragraph-properties style:line-height-at-least="12pt" fo:margin-top="0pt" fo:margin-bottom="0pt"/>
      <style:text-properties/>
    </style:style>
    <style:style style:family="text" style:name="T185">
      <style:text-properties fo:color="#1f1f1f" fo:font-family="Arial" style:font-family-asian="Arial" style:font-family-complex="Arial" fo:font-size="12pt" fo:font-weight="bold"/>
    </style:style>
    <style:style style:family="table-cell" style:name="ce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6">
      <style:paragraph-properties style:line-height-at-least="12pt" fo:margin-top="0pt" fo:margin-bottom="0pt"/>
      <style:text-properties/>
    </style:style>
    <style:style style:family="text" style:name="T186">
      <style:text-properties fo:color="#1f1f1f" fo:font-family="Arial" style:font-family-asian="Arial" style:font-family-complex="Arial" fo:font-size="12pt" fo:font-weight="bold"/>
    </style:style>
    <style:style style:family="table-cell" style:name="ce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7">
      <style:paragraph-properties style:line-height-at-least="12pt" fo:margin-top="0pt" fo:margin-bottom="0pt"/>
      <style:text-properties/>
    </style:style>
    <style:style style:family="text" style:name="T187">
      <style:text-properties fo:color="#1f1f1f" fo:font-family="Arial" style:font-family-asian="Arial" style:font-family-complex="Arial" fo:font-size="12pt" fo:font-weight="bold"/>
    </style:style>
    <style:style style:family="table-row" style:name="ro2">
      <style:table-row-properties/>
    </style:style>
    <style:style style:family="table-cell" style:name="ce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8">
      <style:paragraph-properties style:line-height-at-least="12pt" fo:margin-top="0pt" fo:margin-bottom="0pt"/>
      <style:text-properties/>
    </style:style>
    <style:style style:family="text" style:name="T188">
      <style:text-properties fo:color="#1f1f1f" fo:font-family="Arial" style:font-family-asian="Arial" style:font-family-complex="Arial" fo:font-size="12pt"/>
    </style:style>
    <style:style style:family="table-cell" style:name="ce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
      <style:paragraph-properties style:line-height-at-least="12pt" fo:margin-top="0pt" fo:margin-bottom="0pt"/>
      <style:text-properties/>
    </style:style>
    <style:style style:family="text" style:name="T189">
      <style:text-properties fo:color="#1f1f1f" fo:font-family="Arial" style:font-family-asian="Arial" style:font-family-complex="Arial" fo:font-size="12pt"/>
    </style:style>
    <style:style style:family="table-cell" style:name="ce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
      <style:paragraph-properties style:line-height-at-least="12pt" fo:margin-top="0pt" fo:margin-bottom="0pt"/>
      <style:text-properties/>
    </style:style>
    <style:style style:family="text" style:name="T190">
      <style:text-properties fo:color="#1f1f1f" fo:font-family="Arial" style:font-family-asian="Arial" style:font-family-complex="Arial" fo:font-size="12pt"/>
    </style:style>
    <style:style style:family="table-row" style:name="ro3">
      <style:table-row-properties/>
    </style:style>
    <style:style style:family="table-cell" style:name="ce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1">
      <style:paragraph-properties style:line-height-at-least="12pt" fo:margin-top="0pt" fo:margin-bottom="0pt"/>
      <style:text-properties/>
    </style:style>
    <style:style style:family="text" style:name="T191">
      <style:text-properties fo:color="#1f1f1f" fo:font-family="Arial" style:font-family-asian="Arial" style:font-family-complex="Arial" fo:font-size="12pt"/>
    </style:style>
    <style:style style:family="table-cell" style:name="ce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2">
      <style:paragraph-properties style:line-height-at-least="12pt" fo:margin-top="0pt" fo:margin-bottom="0pt"/>
      <style:text-properties/>
    </style:style>
    <style:style style:family="text" style:name="T192">
      <style:text-properties fo:color="#1f1f1f" fo:font-family="Arial" style:font-family-asian="Arial" style:font-family-complex="Arial" fo:font-size="12pt"/>
    </style:style>
    <style:style style:family="table-cell" style:name="ce1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3">
      <style:paragraph-properties style:line-height-at-least="12pt" fo:margin-top="0pt" fo:margin-bottom="0pt"/>
      <style:text-properties/>
    </style:style>
    <style:style style:family="text" style:name="T193">
      <style:text-properties fo:color="#1f1f1f" fo:font-family="Arial" style:font-family-asian="Arial" style:font-family-complex="Arial" fo:font-size="12pt"/>
    </style:style>
    <style:style style:family="paragraph" style:name="P74">
      <style:paragraph-properties fo:line-height="115%" fo:margin-left="0cm" fo:margin-right="0cm" fo:text-indent="0cm" fo:margin-top="0pt" fo:margin-bottom="0pt" fo:border="none"/>
      <style:text-properties/>
    </style:style>
    <style:style style:family="text" style:name="T194">
      <style:text-properties fo:color="#1f1f1f" fo:font-family="Arial" style:font-family-asian="Arial" style:font-family-complex="Arial" fo:font-size="12pt"/>
    </style:style>
    <style:style style:parent-style-name="141" style:family="paragraph" style:name="P7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5">
      <style:text-properties fo:color="#1f1f1f" fo:font-family="Arial" style:font-family-asian="Arial" style:font-family-complex="Arial" fo:font-size="14pt" fo:font-weight="bold"/>
    </style:style>
    <style:style style:parent-style-name="668" style:list-style-name="WWNum2" style:family="paragraph" style:name="P76">
      <style:paragraph-properties fo:line-height="115%" fo:margin-right="0cm" fo:margin-top="0pt" fo:margin-bottom="0pt" fo:border="none"/>
      <style:text-properties/>
    </style:style>
    <style:style style:family="text" style:name="T196">
      <style:text-properties fo:color="#1f1f1f" fo:font-family="Arial" style:font-family-asian="Arial" style:font-family-complex="Arial" fo:font-size="12pt"/>
    </style:style>
    <style:style style:parent-style-name="668" style:list-style-name="WWNum2" style:family="paragraph" style:name="P77">
      <style:paragraph-properties fo:line-height="115%" fo:margin-right="0cm" fo:margin-top="0pt" fo:margin-bottom="0pt" fo:border="none"/>
      <style:text-properties/>
    </style:style>
    <style:style style:family="text" style:name="T197">
      <style:text-properties fo:color="#1f1f1f" fo:font-family="Arial" style:font-family-asian="Arial" style:font-family-complex="Arial" fo:font-size="12pt"/>
    </style:style>
    <style:style style:parent-style-name="668" style:list-style-name="WWNum2" style:family="paragraph" style:name="P78">
      <style:paragraph-properties fo:line-height="115%" fo:margin-right="0cm" fo:margin-top="0pt" fo:margin-bottom="0pt" fo:border="none"/>
      <style:text-properties/>
    </style:style>
    <style:style style:family="text" style:name="T198">
      <style:text-properties fo:color="#1f1f1f" fo:font-family="Arial" style:font-family-asian="Arial" style:font-family-complex="Arial" fo:font-size="12pt"/>
    </style:style>
    <style:style style:parent-style-name="668" style:list-style-name="WWNum2" style:family="paragraph" style:name="P79">
      <style:paragraph-properties fo:line-height="115%" fo:margin-right="0cm" fo:margin-top="0pt" fo:margin-bottom="0pt" fo:border="none"/>
      <style:text-properties/>
    </style:style>
    <style:style style:family="text" style:name="T199">
      <style:text-properties fo:color="#1f1f1f" fo:font-family="Arial" style:font-family-asian="Arial" style:font-family-complex="Arial" fo:font-size="12pt"/>
    </style:style>
    <style:style style:family="paragraph" style:name="P80">
      <style:paragraph-properties/>
      <style:text-properties/>
    </style:style>
    <style:style style:parent-style-name="141" style:family="paragraph" style:name="P8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200">
      <style:text-properties fo:color="#1f1f1f" fo:font-family="Arial" style:font-family-asian="Arial" style:font-family-complex="Arial" fo:font-size="14pt" fo:font-weight="bold"/>
    </style:style>
    <style:style style:family="paragraph" style:name="P82">
      <style:paragraph-properties fo:line-height="115%" fo:margin-left="0cm" fo:margin-right="0cm" fo:text-indent="0cm" fo:margin-top="0pt" fo:margin-bottom="0pt" fo:border="none"/>
      <style:text-properties/>
    </style:style>
    <style:style style:family="text" style:name="T201">
      <style:text-properties fo:color="#1f1f1f" fo:font-family="Arial" style:font-family-asian="Arial" style:font-family-complex="Arial" fo:font-size="12pt"/>
    </style:style>
    <style:style style:family="paragraph" style:name="P83">
      <style:paragraph-properties fo:line-height="115%" fo:margin-left="0cm" fo:margin-right="0cm" fo:text-indent="0cm" fo:margin-top="0pt" fo:margin-bottom="0pt" fo:border="none"/>
      <style:text-properties/>
    </style:style>
    <style:style style:family="text" style:name="T202">
      <style:text-properties fo:color="#1f1f1f" fo:font-family="Arial" style:font-family-asian="Arial" style:font-family-complex="Arial" fo:font-size="12pt"/>
    </style:style>
    <style:style style:family="paragraph" style:name="P84">
      <style:paragraph-properties fo:line-height="115%" fo:margin-left="0cm" fo:margin-right="0cm" fo:text-indent="0cm" fo:margin-top="0pt" fo:margin-bottom="0pt" fo:border="none"/>
      <style:text-properties/>
    </style:style>
    <style:style style:family="text" style:name="T203">
      <style:text-properties fo:color="#1f1f1f" fo:font-family="Arial" style:font-family-asian="Arial" style:font-family-complex="Arial" fo:font-size="12pt"/>
    </style:style>
    <style:style style:family="paragraph" style:name="P85">
      <style:paragraph-properties fo:line-height="115%" fo:margin-left="0cm" fo:margin-right="0cm" fo:text-indent="0cm" fo:margin-top="0pt" fo:margin-bottom="0pt" fo:border="none"/>
      <style:text-properties/>
    </style:style>
    <style:style style:family="text" style:name="T204">
      <style:text-properties fo:color="#1f1f1f" fo:font-family="Arial" style:font-family-asian="Arial" style:font-family-complex="Arial" fo:font-size="12pt"/>
    </style:style>
    <style:style style:family="paragraph" style:name="P86">
      <style:paragraph-properties fo:line-height="115%" fo:margin-left="0cm" fo:margin-right="0cm" fo:text-indent="0cm" fo:margin-top="0pt" fo:margin-bottom="0pt" fo:border="none"/>
      <style:text-properties/>
    </style:style>
    <style:style style:family="text" style:name="T205">
      <style:text-properties fo:color="#1f1f1f" fo:font-family="Arial" style:font-family-asian="Arial" style:font-family-complex="Arial" fo:font-size="12pt"/>
    </style:style>
    <style:style style:family="text" style:name="T206">
      <style:text-properties fo:color="#1f1f1f" fo:font-family="Arial" style:font-family-asian="Arial" style:font-family-complex="Arial" fo:font-size="12pt"/>
    </style:style>
    <style:style style:parent-style-name="141" style:family="paragraph" style:name="P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07">
      <style:text-properties fo:color="#1f1f1f" fo:font-family="Arial" style:font-family-asian="Arial" style:font-family-complex="Arial" fo:font-size="14pt" fo:font-weight="bold"/>
    </style:style>
    <style:style style:parent-style-name="668" style:list-style-name="WWNum3" style:family="paragraph" style:name="P88">
      <style:paragraph-properties fo:line-height="115%" fo:margin-right="0cm" fo:margin-top="0pt" fo:margin-bottom="0pt" fo:border="none"/>
      <style:text-properties/>
    </style:style>
    <style:style style:family="text" style:name="T208">
      <style:text-properties fo:color="#1f1f1f" fo:font-family="Arial" style:font-family-asian="Arial" style:font-family-complex="Arial" fo:font-size="12pt"/>
    </style:style>
    <style:style style:parent-style-name="668" style:list-style-name="WWNum3" style:family="paragraph" style:name="P89">
      <style:paragraph-properties fo:line-height="115%" fo:margin-right="0cm" fo:margin-top="0pt" fo:margin-bottom="0pt" fo:border="none"/>
      <style:text-properties/>
    </style:style>
    <style:style style:family="text" style:name="T209">
      <style:text-properties fo:color="#1f1f1f" fo:font-family="Arial" style:font-family-asian="Arial" style:font-family-complex="Arial" fo:font-size="12pt"/>
    </style:style>
    <style:style style:parent-style-name="668" style:list-style-name="WWNum3" style:family="paragraph" style:name="P90">
      <style:paragraph-properties fo:line-height="115%" fo:margin-right="0cm" fo:margin-top="0pt" fo:margin-bottom="0pt" fo:border="none"/>
      <style:text-properties/>
    </style:style>
    <style:style style:family="text" style:name="T210">
      <style:text-properties fo:color="#1f1f1f" fo:font-family="Arial" style:font-family-asian="Arial" style:font-family-complex="Arial" fo:font-size="12pt"/>
    </style:style>
    <style:style style:parent-style-name="668" style:list-style-name="WWNum3" style:family="paragraph" style:name="P91">
      <style:paragraph-properties fo:line-height="115%" fo:margin-right="0cm" fo:margin-top="0pt" fo:margin-bottom="0pt" fo:border="none"/>
      <style:text-properties/>
    </style:style>
    <style:style style:family="text" style:name="T211">
      <style:text-properties fo:color="#1f1f1f" fo:font-family="Arial" style:font-family-asian="Arial" style:font-family-complex="Arial" fo:font-size="12pt"/>
    </style:style>
    <style:style style:family="paragraph" style:name="P92">
      <style:paragraph-properties/>
      <style:text-properties/>
    </style:style>
    <style:style style:parent-style-name="141" style:family="paragraph" style:name="P9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212">
      <style:text-properties fo:color="#1f1f1f" fo:font-family="Arial" style:font-family-asian="Arial" style:font-family-complex="Arial" fo:font-size="14pt" fo:font-weight="bold"/>
    </style:style>
    <style:style style:family="paragraph" style:name="P94">
      <style:paragraph-properties fo:line-height="115%" fo:margin-left="0cm" fo:margin-right="0cm" fo:text-indent="0cm" fo:margin-top="0pt" fo:margin-bottom="0pt" fo:border="none"/>
      <style:text-properties/>
    </style:style>
    <style:style style:family="text" style:name="T213">
      <style:text-properties fo:color="#1f1f1f" fo:font-family="Arial" style:font-family-asian="Arial" style:font-family-complex="Arial" fo:font-size="12pt"/>
    </style:style>
    <style:style style:parent-style-name="142" style:family="paragraph" style:name="P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14">
      <style:text-properties fo:color="#1f1f1f" fo:font-family="Arial" style:font-family-asian="Arial" style:font-family-complex="Arial" fo:font-size="12pt" fo:font-weight="bold"/>
    </style:style>
    <style:style style:family="paragraph" style:name="P96">
      <style:paragraph-properties fo:line-height="115%" fo:margin-left="0cm" fo:margin-right="0cm" fo:text-indent="0cm" fo:margin-top="0pt" fo:margin-bottom="0pt" fo:border="none"/>
      <style:text-properties/>
    </style:style>
    <style:style style:family="text" style:name="T215">
      <style:text-properties fo:color="#1f1f1f" fo:font-family="Arial" style:font-family-asian="Arial" style:font-family-complex="Arial" fo:font-size="12pt"/>
    </style:style>
    <style:style style:family="text" style:name="T216">
      <style:text-properties fo:color="#1f1f1f" fo:font-family="Arial" style:font-family-asian="Arial" style:font-family-complex="Arial" fo:font-size="12pt"/>
    </style:style>
    <style:style style:parent-style-name="142" style:family="paragraph" style:name="P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17">
      <style:text-properties fo:color="#1f1f1f" fo:font-family="Arial" style:font-family-asian="Arial" style:font-family-complex="Arial" fo:font-size="12pt" fo:font-weight="bold"/>
    </style:style>
    <style:style style:family="paragraph" style:name="P98">
      <style:paragraph-properties fo:line-height="115%" fo:margin-left="0cm" fo:margin-right="0cm" fo:text-indent="0cm" fo:margin-top="0pt" fo:margin-bottom="0pt" fo:border="none"/>
      <style:text-properties/>
    </style:style>
    <style:style style:family="text" style:name="T218">
      <style:text-properties fo:color="#1f1f1f" fo:font-family="Arial" style:font-family-asian="Arial" style:font-family-complex="Arial" fo:font-size="12pt"/>
    </style:style>
    <style:style style:family="text" style:name="T219">
      <style:text-properties fo:color="#1f1f1f" fo:font-family="Arial" style:font-family-asian="Arial" style:font-family-complex="Arial" fo:font-size="12pt"/>
    </style:style>
    <style:style style:parent-style-name="142" style:family="paragraph" style:name="P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20">
      <style:text-properties fo:color="#1f1f1f" fo:font-family="Arial" style:font-family-asian="Arial" style:font-family-complex="Arial" fo:font-size="12pt" fo:font-weight="bold"/>
    </style:style>
    <style:style style:family="paragraph" style:name="P100">
      <style:paragraph-properties fo:line-height="115%" fo:margin-left="0cm" fo:margin-right="0cm" fo:text-indent="0cm" fo:margin-top="0pt" fo:margin-bottom="0pt" fo:border="none"/>
      <style:text-properties/>
    </style:style>
    <style:style style:family="text" style:name="T221">
      <style:text-properties fo:color="#1f1f1f" fo:font-family="Arial" style:font-family-asian="Arial" style:font-family-complex="Arial" fo:font-size="12pt"/>
    </style:style>
    <style:style style:family="text" style:name="T222">
      <style:text-properties fo:color="#1f1f1f" fo:font-family="Arial" style:font-family-asian="Arial" style:font-family-complex="Arial" fo:font-size="12pt"/>
    </style:style>
    <style:style style:parent-style-name="142" style:family="paragraph" style:name="P1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23">
      <style:text-properties fo:color="#1f1f1f" fo:font-family="Arial" style:font-family-asian="Arial" style:font-family-complex="Arial" fo:font-size="12pt" fo:font-weight="bold"/>
    </style:style>
    <style:style style:family="paragraph" style:name="P102">
      <style:paragraph-properties fo:line-height="115%" fo:margin-left="0cm" fo:margin-right="0cm" fo:text-indent="0cm" fo:margin-top="0pt" fo:margin-bottom="0pt" fo:border="none"/>
      <style:text-properties/>
    </style:style>
    <style:style style:family="text" style:name="T224">
      <style:text-properties fo:color="#1f1f1f" fo:font-family="Arial" style:font-family-asian="Arial" style:font-family-complex="Arial" fo:font-size="12pt"/>
    </style:style>
    <style:style style:family="text" style:name="T225">
      <style:text-properties fo:color="#1f1f1f" fo:font-family="Arial" style:font-family-asian="Arial" style:font-family-complex="Arial" fo:font-size="12pt"/>
    </style:style>
    <style:style style:parent-style-name="141" style:family="paragraph" style:name="P10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26">
      <style:text-properties fo:color="#1f1f1f" fo:font-family="Arial" style:font-family-asian="Arial" style:font-family-complex="Arial" fo:font-size="14pt" fo:font-weight="bold"/>
    </style:style>
    <style:style style:parent-style-name="668" style:list-style-name="WWNum4" style:family="paragraph" style:name="P104">
      <style:paragraph-properties fo:line-height="115%" fo:margin-right="0cm" fo:margin-top="0pt" fo:margin-bottom="0pt" fo:border="none"/>
      <style:text-properties/>
    </style:style>
    <style:style style:family="text" style:name="T227">
      <style:text-properties fo:color="#1f1f1f" fo:font-family="Arial" style:font-family-asian="Arial" style:font-family-complex="Arial" fo:font-size="12pt"/>
    </style:style>
    <style:style style:parent-style-name="668" style:list-style-name="WWNum4" style:family="paragraph" style:name="P105">
      <style:paragraph-properties fo:line-height="115%" fo:margin-right="0cm" fo:margin-top="0pt" fo:margin-bottom="0pt" fo:border="none"/>
      <style:text-properties/>
    </style:style>
    <style:style style:family="text" style:name="T228">
      <style:text-properties fo:color="#1f1f1f" fo:font-family="Arial" style:font-family-asian="Arial" style:font-family-complex="Arial" fo:font-size="12pt"/>
    </style:style>
    <style:style style:parent-style-name="668" style:list-style-name="WWNum4" style:family="paragraph" style:name="P106">
      <style:paragraph-properties fo:line-height="115%" fo:margin-right="0cm" fo:margin-top="0pt" fo:margin-bottom="0pt" fo:border="none"/>
      <style:text-properties/>
    </style:style>
    <style:style style:family="text" style:name="T229">
      <style:text-properties fo:color="#1f1f1f" fo:font-family="Arial" style:font-family-asian="Arial" style:font-family-complex="Arial" fo:font-size="12pt"/>
    </style:style>
    <style:style style:parent-style-name="668" style:list-style-name="WWNum4" style:family="paragraph" style:name="P107">
      <style:paragraph-properties fo:line-height="115%" fo:margin-right="0cm" fo:margin-top="0pt" fo:margin-bottom="0pt" fo:border="none"/>
      <style:text-properties/>
    </style:style>
    <style:style style:family="text" style:name="T230">
      <style:text-properties fo:color="#1f1f1f" fo:font-family="Arial" style:font-family-asian="Arial" style:font-family-complex="Arial" fo:font-size="12pt"/>
    </style:style>
    <style:style style:family="paragraph" style:name="P108">
      <style:paragraph-properties/>
      <style:text-properties/>
    </style:style>
    <style:style style:family="paragraph" style:name="P109">
      <style:paragraph-properties fo:line-height="115%" fo:margin-left="0cm" fo:margin-right="0cm" fo:text-indent="0cm" fo:margin-top="0pt" fo:margin-bottom="0pt" fo:break-before="page" fo:border="none"/>
      <style:text-properties/>
    </style:style>
    <style:style style:family="text" style:name="T231">
      <style:text-properties fo:color="#1f1f1f" fo:font-family="Arial" style:font-family-asian="Arial" style:font-family-complex="Arial" fo:font-size="12pt"/>
    </style:style>
    <style:style style:parent-style-name="141" style:family="paragraph" style:name="P1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32">
      <style:text-properties fo:color="#1f1f1f" fo:font-family="Arial" style:font-family-asian="Arial" style:font-family-complex="Arial" fo:font-size="14pt" fo:font-weight="bold"/>
    </style:style>
    <style:style style:family="paragraph" style:name="P111">
      <style:paragraph-properties fo:line-height="115%" fo:margin-left="0cm" fo:margin-right="0cm" fo:text-indent="0cm" fo:margin-top="0pt" fo:margin-bottom="0pt" fo:border="none"/>
      <style:text-properties/>
    </style:style>
    <style:style style:family="text" style:name="T233">
      <style:text-properties fo:color="#1f1f1f" fo:font-family="Arial" style:font-family-asian="Arial" style:font-family-complex="Arial" fo:font-size="12pt"/>
    </style:style>
    <style:style style:parent-style-name="142" style:family="paragraph" style:name="P1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34">
      <style:text-properties fo:color="#1f1f1f" fo:font-family="Arial" style:font-family-asian="Arial" style:font-family-complex="Arial" fo:font-size="12pt" fo:font-weight="bold"/>
    </style:style>
    <style:style style:family="paragraph" style:name="P113">
      <style:paragraph-properties fo:line-height="115%" fo:margin-left="0cm" fo:margin-right="0cm" fo:text-indent="0cm" fo:margin-top="0pt" fo:margin-bottom="0pt" fo:border="none"/>
      <style:text-properties/>
    </style:style>
    <style:style style:family="text" style:name="T235">
      <style:text-properties fo:color="#1f1f1f" fo:font-family="Arial" style:font-family-asian="Arial" style:font-family-complex="Arial" fo:font-size="12pt"/>
    </style:style>
    <style:style style:parent-style-name="142" style:family="paragraph" style:name="P1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36">
      <style:text-properties fo:color="#1f1f1f" fo:font-family="Arial" style:font-family-asian="Arial" style:font-family-complex="Arial" fo:font-size="12pt" fo:font-weight="bold"/>
    </style:style>
    <style:style style:family="paragraph" style:name="P115">
      <style:paragraph-properties fo:line-height="115%" fo:margin-left="0cm" fo:margin-right="0cm" fo:text-indent="0cm" fo:margin-top="0pt" fo:margin-bottom="0pt" fo:border="none"/>
      <style:text-properties/>
    </style:style>
    <style:style style:family="text" style:name="T237">
      <style:text-properties fo:color="#1f1f1f" fo:font-family="Arial" style:font-family-asian="Arial" style:font-family-complex="Arial" fo:font-size="12pt"/>
    </style:style>
    <style:style style:parent-style-name="142" style:family="paragraph" style:name="P1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38">
      <style:text-properties fo:color="#1f1f1f" fo:font-family="Arial" style:font-family-asian="Arial" style:font-family-complex="Arial" fo:font-size="12pt" fo:font-weight="bold"/>
    </style:style>
    <style:style style:family="paragraph" style:name="P117">
      <style:paragraph-properties fo:line-height="115%" fo:margin-left="0cm" fo:margin-right="0cm" fo:text-indent="0cm" fo:margin-top="0pt" fo:margin-bottom="0pt" fo:border="none"/>
      <style:text-properties/>
    </style:style>
    <style:style style:family="text" style:name="T239">
      <style:text-properties fo:color="#1f1f1f" fo:font-family="Arial" style:font-family-asian="Arial" style:font-family-complex="Arial" fo:font-size="12pt"/>
    </style:style>
    <style:style style:parent-style-name="142" style:family="paragraph" style:name="P1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40">
      <style:text-properties fo:color="#1f1f1f" fo:font-family="Arial" style:font-family-asian="Arial" style:font-family-complex="Arial" fo:font-size="12pt" fo:font-weight="bold"/>
    </style:style>
    <style:style style:family="paragraph" style:name="P119">
      <style:paragraph-properties fo:line-height="115%" fo:margin-left="0cm" fo:margin-right="0cm" fo:text-indent="0cm" fo:margin-top="0pt" fo:margin-bottom="0pt" fo:border="none"/>
      <style:text-properties/>
    </style:style>
    <style:style style:family="text" style:name="T241">
      <style:text-properties fo:color="#1f1f1f" fo:font-family="Arial" style:font-family-asian="Arial" style:font-family-complex="Arial" fo:font-size="12pt"/>
    </style:style>
    <style:style style:family="text" style:name="T242">
      <style:text-properties fo:color="#1f1f1f" fo:font-family="Arial" style:font-family-asian="Arial" style:font-family-complex="Arial" fo:font-size="12pt"/>
    </style:style>
    <style:style style:parent-style-name="141" style:family="paragraph" style:name="P12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43">
      <style:text-properties fo:color="#1f1f1f" fo:font-family="Arial" style:font-family-asian="Arial" style:font-family-complex="Arial" fo:font-size="14pt" fo:font-weight="bold"/>
    </style:style>
    <style:style style:parent-style-name="668" style:list-style-name="WWNum5" style:family="paragraph" style:name="P121">
      <style:paragraph-properties fo:line-height="115%" fo:margin-right="0cm" fo:margin-top="0pt" fo:margin-bottom="0pt" fo:border="none"/>
      <style:text-properties/>
    </style:style>
    <style:style style:family="text" style:name="T244">
      <style:text-properties fo:color="#1f1f1f" fo:font-family="Arial" style:font-family-asian="Arial" style:font-family-complex="Arial" fo:font-size="12pt"/>
    </style:style>
    <style:style style:parent-style-name="668" style:list-style-name="WWNum5" style:family="paragraph" style:name="P122">
      <style:paragraph-properties fo:line-height="115%" fo:margin-right="0cm" fo:margin-top="0pt" fo:margin-bottom="0pt" fo:border="none"/>
      <style:text-properties/>
    </style:style>
    <style:style style:family="text" style:name="T245">
      <style:text-properties fo:color="#1f1f1f" fo:font-family="Arial" style:font-family-asian="Arial" style:font-family-complex="Arial" fo:font-size="12pt"/>
    </style:style>
    <style:style style:parent-style-name="668" style:list-style-name="WWNum5" style:family="paragraph" style:name="P123">
      <style:paragraph-properties fo:line-height="115%" fo:margin-right="0cm" fo:margin-top="0pt" fo:margin-bottom="0pt" fo:border="none"/>
      <style:text-properties/>
    </style:style>
    <style:style style:family="text" style:name="T246">
      <style:text-properties fo:color="#1f1f1f" fo:font-family="Arial" style:font-family-asian="Arial" style:font-family-complex="Arial" fo:font-size="12pt"/>
    </style:style>
    <style:style style:parent-style-name="668" style:list-style-name="WWNum5" style:family="paragraph" style:name="P124">
      <style:paragraph-properties fo:line-height="115%" fo:margin-right="0cm" fo:margin-top="0pt" fo:margin-bottom="0pt" fo:border="none"/>
      <style:text-properties/>
    </style:style>
    <style:style style:family="text" style:name="T247">
      <style:text-properties fo:color="#1f1f1f" fo:font-family="Arial" style:font-family-asian="Arial" style:font-family-complex="Arial" fo:font-size="12pt"/>
    </style:style>
    <style:style style:family="paragraph" style:name="P125">
      <style:paragraph-properties/>
      <style:text-properties/>
    </style:style>
    <style:style style:parent-style-name="141" style:family="paragraph" style:name="P12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248">
      <style:text-properties fo:color="#1f1f1f" fo:font-family="Arial" style:font-family-asian="Arial" style:font-family-complex="Arial" fo:font-size="14pt" fo:font-weight="bold"/>
    </style:style>
    <style:style style:family="paragraph" style:name="P127">
      <style:paragraph-properties fo:line-height="115%" fo:margin-left="0cm" fo:margin-right="0cm" fo:text-indent="0cm" fo:margin-top="0pt" fo:margin-bottom="0pt" fo:border="none"/>
      <style:text-properties/>
    </style:style>
    <style:style style:family="text" style:name="T249">
      <style:text-properties fo:color="#1f1f1f" fo:font-family="Arial" style:font-family-asian="Arial" style:font-family-complex="Arial" fo:font-size="12pt"/>
    </style:style>
    <style:style style:parent-style-name="142" style:family="paragraph" style:name="P12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50">
      <style:text-properties fo:color="#1f1f1f" fo:font-family="Arial" style:font-family-asian="Arial" style:font-family-complex="Arial" fo:font-size="12pt" fo:font-weight="bold"/>
    </style:style>
    <style:style style:family="paragraph" style:name="P129">
      <style:paragraph-properties fo:line-height="115%" fo:margin-left="0cm" fo:margin-right="0cm" fo:text-indent="0cm" fo:margin-top="0pt" fo:margin-bottom="0pt" fo:border="none"/>
      <style:text-properties/>
    </style:style>
    <style:style style:family="text" style:name="T251">
      <style:text-properties fo:color="#1f1f1f" fo:font-family="Arial" style:font-family-asian="Arial" style:font-family-complex="Arial" fo:font-size="12pt"/>
    </style:style>
    <style:style style:parent-style-name="142" style:family="paragraph" style:name="P13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52">
      <style:text-properties fo:color="#1f1f1f" fo:font-family="Arial" style:font-family-asian="Arial" style:font-family-complex="Arial" fo:font-size="12pt" fo:font-weight="bold"/>
    </style:style>
    <style:style style:family="paragraph" style:name="P131">
      <style:paragraph-properties fo:line-height="115%" fo:margin-left="0cm" fo:margin-right="0cm" fo:text-indent="0cm" fo:margin-top="0pt" fo:margin-bottom="0pt" fo:border="none"/>
      <style:text-properties/>
    </style:style>
    <style:style style:family="text" style:name="T253">
      <style:text-properties fo:color="#1f1f1f" fo:font-family="Arial" style:font-family-asian="Arial" style:font-family-complex="Arial" fo:font-size="12pt"/>
    </style:style>
    <style:style style:parent-style-name="142" style:family="paragraph" style:name="P1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54">
      <style:text-properties fo:color="#1f1f1f" fo:font-family="Arial" style:font-family-asian="Arial" style:font-family-complex="Arial" fo:font-size="12pt" fo:font-weight="bold"/>
    </style:style>
    <style:style style:family="paragraph" style:name="P133">
      <style:paragraph-properties fo:line-height="115%" fo:margin-left="0cm" fo:margin-right="0cm" fo:text-indent="0cm" fo:margin-top="0pt" fo:margin-bottom="0pt" fo:border="none"/>
      <style:text-properties/>
    </style:style>
    <style:style style:family="text" style:name="T255">
      <style:text-properties fo:color="#1f1f1f" fo:font-family="Arial" style:font-family-asian="Arial" style:font-family-complex="Arial" fo:font-size="12pt"/>
    </style:style>
    <style:style style:parent-style-name="142" style:family="paragraph" style:name="P1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56">
      <style:text-properties fo:color="#1f1f1f" fo:font-family="Arial" style:font-family-asian="Arial" style:font-family-complex="Arial" fo:font-size="12pt" fo:font-weight="bold"/>
    </style:style>
    <style:style style:family="paragraph" style:name="P135">
      <style:paragraph-properties fo:line-height="115%" fo:margin-left="0cm" fo:margin-right="0cm" fo:text-indent="0cm" fo:margin-top="0pt" fo:margin-bottom="0pt" fo:border="none"/>
      <style:text-properties/>
    </style:style>
    <style:style style:family="text" style:name="T257">
      <style:text-properties fo:color="#1f1f1f" fo:font-family="Arial" style:font-family-asian="Arial" style:font-family-complex="Arial" fo:font-size="12pt"/>
    </style:style>
    <style:style style:parent-style-name="141" style:family="paragraph" style:name="P13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58">
      <style:text-properties fo:color="#1f1f1f" fo:font-family="Arial" style:font-family-asian="Arial" style:font-family-complex="Arial" fo:font-size="14pt" fo:font-weight="bold"/>
    </style:style>
    <style:style style:parent-style-name="668" style:list-style-name="WWNum6" style:family="paragraph" style:name="P137">
      <style:paragraph-properties fo:line-height="115%" fo:margin-right="0cm" fo:margin-top="0pt" fo:margin-bottom="0pt" fo:border="none"/>
      <style:text-properties/>
    </style:style>
    <style:style style:family="text" style:name="T259">
      <style:text-properties fo:color="#1f1f1f" fo:font-family="Arial" style:font-family-asian="Arial" style:font-family-complex="Arial" fo:font-size="12pt"/>
    </style:style>
    <style:style style:parent-style-name="668" style:list-style-name="WWNum6" style:family="paragraph" style:name="P138">
      <style:paragraph-properties fo:line-height="115%" fo:margin-right="0cm" fo:margin-top="0pt" fo:margin-bottom="0pt" fo:border="none"/>
      <style:text-properties/>
    </style:style>
    <style:style style:family="text" style:name="T260">
      <style:text-properties fo:color="#1f1f1f" fo:font-family="Arial" style:font-family-asian="Arial" style:font-family-complex="Arial" fo:font-size="12pt"/>
    </style:style>
    <style:style style:parent-style-name="668" style:list-style-name="WWNum6" style:family="paragraph" style:name="P139">
      <style:paragraph-properties fo:line-height="115%" fo:margin-right="0cm" fo:margin-top="0pt" fo:margin-bottom="0pt" fo:border="none"/>
      <style:text-properties/>
    </style:style>
    <style:style style:family="text" style:name="T261">
      <style:text-properties fo:color="#1f1f1f" fo:font-family="Arial" style:font-family-asian="Arial" style:font-family-complex="Arial" fo:font-size="12pt"/>
    </style:style>
    <style:style style:parent-style-name="668" style:list-style-name="WWNum6" style:family="paragraph" style:name="P140">
      <style:paragraph-properties fo:line-height="115%" fo:margin-right="0cm" fo:margin-top="0pt" fo:margin-bottom="0pt" fo:border="none"/>
      <style:text-properties/>
    </style:style>
    <style:style style:family="text" style:name="T262">
      <style:text-properties fo:color="#1f1f1f" fo:font-family="Arial" style:font-family-asian="Arial" style:font-family-complex="Arial" fo:font-size="12pt"/>
    </style:style>
    <style:style style:family="paragraph" style:name="P141">
      <style:paragraph-properties/>
      <style:text-properties/>
    </style:style>
    <style:style style:family="paragraph" style:name="P142">
      <style:paragraph-properties fo:line-height="115%" fo:margin-left="0cm" fo:margin-right="0cm" fo:text-indent="0cm" fo:margin-top="0pt" fo:margin-bottom="0pt" fo:break-before="page" fo:border="none"/>
      <style:text-properties/>
    </style:style>
    <style:style style:family="text" style:name="T263">
      <style:text-properties fo:color="#1f1f1f" fo:font-family="Arial" style:font-family-asian="Arial" style:font-family-complex="Arial" fo:font-size="12pt"/>
    </style:style>
    <style:style style:parent-style-name="141" style:family="paragraph" style:name="P1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64">
      <style:text-properties fo:color="#1f1f1f" fo:font-family="Arial" style:font-family-asian="Arial" style:font-family-complex="Arial" fo:font-size="14pt" fo:font-weight="bold"/>
    </style:style>
    <style:style style:family="paragraph" style:name="P144">
      <style:paragraph-properties fo:line-height="115%" fo:margin-left="0cm" fo:margin-right="0cm" fo:text-indent="0cm" fo:margin-top="0pt" fo:margin-bottom="0pt" fo:border="none"/>
      <style:text-properties/>
    </style:style>
    <style:style style:family="text" style:name="T265">
      <style:text-properties fo:color="#1f1f1f" fo:font-family="Arial" style:font-family-asian="Arial" style:font-family-complex="Arial" fo:font-size="12pt"/>
    </style:style>
    <style:style style:parent-style-name="142" style:family="paragraph" style:name="P1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66">
      <style:text-properties fo:color="#1f1f1f" fo:font-family="Arial" style:font-family-asian="Arial" style:font-family-complex="Arial" fo:font-size="12pt" fo:font-weight="bold"/>
    </style:style>
    <style:style style:family="paragraph" style:name="P146">
      <style:paragraph-properties fo:line-height="115%" fo:margin-left="0cm" fo:margin-right="0cm" fo:text-indent="0cm" fo:margin-top="0pt" fo:margin-bottom="0pt" fo:border="none"/>
      <style:text-properties/>
    </style:style>
    <style:style style:family="text" style:name="T267">
      <style:text-properties fo:color="#1f1f1f" fo:font-family="Arial" style:font-family-asian="Arial" style:font-family-complex="Arial" fo:font-size="12pt"/>
    </style:style>
    <style:style style:family="text" style:name="T268">
      <style:text-properties fo:color="#1f1f1f" fo:font-family="Arial" style:font-family-asian="Arial" style:font-family-complex="Arial" fo:font-size="12pt"/>
    </style:style>
    <style:style style:parent-style-name="142" style:family="paragraph" style:name="P1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69">
      <style:text-properties fo:color="#1f1f1f" fo:font-family="Arial" style:font-family-asian="Arial" style:font-family-complex="Arial" fo:font-size="12pt" fo:font-weight="bold"/>
    </style:style>
    <style:style style:family="paragraph" style:name="P148">
      <style:paragraph-properties fo:line-height="115%" fo:margin-left="0cm" fo:margin-right="0cm" fo:text-indent="0cm" fo:margin-top="0pt" fo:margin-bottom="0pt" fo:border="none"/>
      <style:text-properties/>
    </style:style>
    <style:style style:family="text" style:name="T270">
      <style:text-properties fo:color="#1f1f1f" fo:font-family="Arial" style:font-family-asian="Arial" style:font-family-complex="Arial" fo:font-size="12pt"/>
    </style:style>
    <style:style style:family="paragraph" style:name="P149">
      <style:paragraph-properties fo:line-height="115%" fo:margin-left="0cm" fo:margin-right="0cm" fo:text-indent="0cm" fo:margin-top="0pt" fo:margin-bottom="0pt" fo:border="none"/>
      <style:text-properties/>
    </style:style>
    <style:style style:family="text" style:name="T271">
      <style:text-properties fo:color="#1f1f1f" fo:font-family="Arial" style:font-family-asian="Arial" style:font-family-complex="Arial" fo:font-size="12pt"/>
    </style:style>
    <style:style style:parent-style-name="142" style:family="paragraph" style:name="P1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72">
      <style:text-properties fo:color="#1f1f1f" fo:font-family="Arial" style:font-family-asian="Arial" style:font-family-complex="Arial" fo:font-size="12pt" fo:font-weight="bold"/>
    </style:style>
    <style:style style:family="paragraph" style:name="P151">
      <style:paragraph-properties fo:line-height="115%" fo:margin-left="0cm" fo:margin-right="0cm" fo:text-indent="0cm" fo:margin-top="0pt" fo:margin-bottom="0pt" fo:border="none"/>
      <style:text-properties/>
    </style:style>
    <style:style style:family="text" style:name="T273">
      <style:text-properties fo:color="#1f1f1f" fo:font-family="Arial" style:font-family-asian="Arial" style:font-family-complex="Arial" fo:font-size="12pt"/>
    </style:style>
    <style:style style:family="text" style:name="T274">
      <style:text-properties fo:color="#1f1f1f" fo:font-family="Arial" style:font-family-asian="Arial" style:font-family-complex="Arial" fo:font-size="12pt"/>
    </style:style>
    <style:style style:parent-style-name="142" style:family="paragraph" style:name="P1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75">
      <style:text-properties fo:color="#1f1f1f" fo:font-family="Arial" style:font-family-asian="Arial" style:font-family-complex="Arial" fo:font-size="12pt" fo:font-weight="bold"/>
    </style:style>
    <style:style style:family="paragraph" style:name="P153">
      <style:paragraph-properties fo:line-height="115%" fo:margin-left="0cm" fo:margin-right="0cm" fo:text-indent="0cm" fo:margin-top="0pt" fo:margin-bottom="0pt" fo:border="none"/>
      <style:text-properties/>
    </style:style>
    <style:style style:family="text" style:name="T276">
      <style:text-properties fo:color="#1f1f1f" fo:font-family="Arial" style:font-family-asian="Arial" style:font-family-complex="Arial" fo:font-size="12pt"/>
    </style:style>
    <style:style style:parent-style-name="668" style:list-style-name="WWNum7" style:family="paragraph" style:name="P154">
      <style:paragraph-properties fo:line-height="115%" fo:margin-right="0cm" fo:margin-top="0pt" fo:margin-bottom="0pt" fo:border="none"/>
      <style:text-properties/>
    </style:style>
    <style:style style:family="text" style:name="T277">
      <style:text-properties fo:color="#1f1f1f" fo:font-family="Arial" style:font-family-asian="Arial" style:font-family-complex="Arial" fo:font-size="12pt"/>
    </style:style>
    <style:style style:parent-style-name="668" style:list-style-name="WWNum7" style:family="paragraph" style:name="P155">
      <style:paragraph-properties fo:line-height="115%" fo:margin-right="0cm" fo:margin-top="0pt" fo:margin-bottom="0pt" fo:border="none"/>
      <style:text-properties/>
    </style:style>
    <style:style style:family="text" style:name="T278">
      <style:text-properties fo:color="#1f1f1f" fo:font-family="Arial" style:font-family-asian="Arial" style:font-family-complex="Arial" fo:font-size="12pt"/>
    </style:style>
    <style:style style:parent-style-name="668" style:list-style-name="WWNum7" style:family="paragraph" style:name="P156">
      <style:paragraph-properties fo:line-height="115%" fo:margin-right="0cm" fo:margin-top="0pt" fo:margin-bottom="0pt" fo:border="none"/>
      <style:text-properties/>
    </style:style>
    <style:style style:family="text" style:name="T279">
      <style:text-properties fo:color="#1f1f1f" fo:font-family="Arial" style:font-family-asian="Arial" style:font-family-complex="Arial" fo:font-size="12pt"/>
    </style:style>
    <style:style style:parent-style-name="141" style:family="paragraph" style:name="P1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80">
      <style:text-properties fo:color="#1f1f1f" fo:font-family="Arial" style:font-family-asian="Arial" style:font-family-complex="Arial" fo:font-size="14pt" fo:font-weight="bold"/>
    </style:style>
    <style:style style:parent-style-name="668" style:list-style-name="WWNum7" style:family="paragraph" style:name="P158">
      <style:paragraph-properties fo:line-height="115%" fo:margin-right="0cm" fo:margin-top="0pt" fo:margin-bottom="0pt" fo:border="none"/>
      <style:text-properties/>
    </style:style>
    <style:style style:family="text" style:name="T281">
      <style:text-properties fo:color="#1f1f1f" fo:font-family="Arial" style:font-family-asian="Arial" style:font-family-complex="Arial" fo:font-size="12pt"/>
    </style:style>
    <style:style style:parent-style-name="668" style:list-style-name="WWNum7" style:family="paragraph" style:name="P159">
      <style:paragraph-properties fo:line-height="115%" fo:margin-right="0cm" fo:margin-top="0pt" fo:margin-bottom="0pt" fo:border="none"/>
      <style:text-properties/>
    </style:style>
    <style:style style:family="text" style:name="T282">
      <style:text-properties fo:color="#1f1f1f" fo:font-family="Arial" style:font-family-asian="Arial" style:font-family-complex="Arial" fo:font-size="12pt"/>
    </style:style>
    <style:style style:parent-style-name="668" style:list-style-name="WWNum7" style:family="paragraph" style:name="P160">
      <style:paragraph-properties fo:line-height="115%" fo:margin-right="0cm" fo:margin-top="0pt" fo:margin-bottom="0pt" fo:border="none"/>
      <style:text-properties/>
    </style:style>
    <style:style style:family="text" style:name="T283">
      <style:text-properties fo:color="#1f1f1f" fo:font-family="Arial" style:font-family-asian="Arial" style:font-family-complex="Arial" fo:font-size="12pt"/>
    </style:style>
    <style:style style:parent-style-name="668" style:list-style-name="WWNum7" style:family="paragraph" style:name="P161">
      <style:paragraph-properties fo:line-height="115%" fo:margin-right="0cm" fo:margin-top="0pt" fo:margin-bottom="0pt" fo:border="none"/>
      <style:text-properties/>
    </style:style>
    <style:style style:family="text" style:name="T284">
      <style:text-properties fo:color="#1f1f1f" fo:font-family="Arial" style:font-family-asian="Arial" style:font-family-complex="Arial" fo:font-size="12pt"/>
    </style:style>
    <style:style style:family="paragraph" style:name="P162">
      <style:paragraph-properties/>
      <style:text-properties/>
    </style:style>
    <style:style style:family="paragraph" style:name="P163">
      <style:paragraph-properties fo:line-height="115%" fo:margin-left="0cm" fo:margin-right="0cm" fo:text-indent="0cm" fo:margin-top="0pt" fo:margin-bottom="0pt" fo:break-before="page" fo:border="none"/>
      <style:text-properties/>
    </style:style>
    <style:style style:family="text" style:name="T285">
      <style:text-properties fo:color="#1f1f1f" fo:font-family="Arial" style:font-family-asian="Arial" style:font-family-complex="Arial" fo:font-size="12pt"/>
    </style:style>
    <style:style style:parent-style-name="141" style:family="paragraph" style:name="P16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86">
      <style:text-properties fo:color="#1f1f1f" fo:font-family="Arial" style:font-family-asian="Arial" style:font-family-complex="Arial" fo:font-size="14pt" fo:font-weight="bold"/>
    </style:style>
    <style:style style:family="paragraph" style:name="P165">
      <style:paragraph-properties fo:line-height="115%" fo:margin-left="0cm" fo:margin-right="0cm" fo:text-indent="0cm" fo:margin-top="0pt" fo:margin-bottom="0pt" fo:border="none"/>
      <style:text-properties/>
    </style:style>
    <style:style style:family="text" style:name="T287">
      <style:text-properties fo:color="#1f1f1f" fo:font-family="Arial" style:font-family-asian="Arial" style:font-family-complex="Arial" fo:font-size="12pt"/>
    </style:style>
    <style:style style:parent-style-name="142" style:family="paragraph" style:name="P1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88">
      <style:text-properties fo:color="#1f1f1f" fo:font-family="Arial" style:font-family-asian="Arial" style:font-family-complex="Arial" fo:font-size="12pt" fo:font-weight="bold"/>
    </style:style>
    <style:style style:family="paragraph" style:name="P167">
      <style:paragraph-properties fo:line-height="115%" fo:margin-left="0cm" fo:margin-right="0cm" fo:text-indent="0cm" fo:margin-top="0pt" fo:margin-bottom="0pt" fo:border="none"/>
      <style:text-properties/>
    </style:style>
    <style:style style:family="text" style:name="T289">
      <style:text-properties fo:color="#1f1f1f" fo:font-family="Arial" style:font-family-asian="Arial" style:font-family-complex="Arial" fo:font-size="12pt"/>
    </style:style>
    <style:style style:parent-style-name="142" style:family="paragraph" style:name="P1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90">
      <style:text-properties fo:color="#1f1f1f" fo:font-family="Arial" style:font-family-asian="Arial" style:font-family-complex="Arial" fo:font-size="12pt" fo:font-weight="bold"/>
    </style:style>
    <style:style style:family="paragraph" style:name="P169">
      <style:paragraph-properties fo:line-height="115%" fo:margin-left="0cm" fo:margin-right="0cm" fo:text-indent="0cm" fo:margin-top="0pt" fo:margin-bottom="0pt" fo:border="none"/>
      <style:text-properties/>
    </style:style>
    <style:style style:family="text" style:name="T291">
      <style:text-properties fo:color="#1f1f1f" fo:font-family="Arial" style:font-family-asian="Arial" style:font-family-complex="Arial" fo:font-size="12pt"/>
    </style:style>
    <style:style style:parent-style-name="142" style:family="paragraph" style:name="P1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92">
      <style:text-properties fo:color="#1f1f1f" fo:font-family="Arial" style:font-family-asian="Arial" style:font-family-complex="Arial" fo:font-size="12pt" fo:font-weight="bold"/>
    </style:style>
    <style:style style:family="paragraph" style:name="P171">
      <style:paragraph-properties fo:line-height="115%" fo:margin-left="0cm" fo:margin-right="0cm" fo:text-indent="0cm" fo:margin-top="0pt" fo:margin-bottom="0pt" fo:border="none"/>
      <style:text-properties/>
    </style:style>
    <style:style style:family="text" style:name="T293">
      <style:text-properties fo:color="#1f1f1f" fo:font-family="Arial" style:font-family-asian="Arial" style:font-family-complex="Arial" fo:font-size="12pt"/>
    </style:style>
    <style:style style:parent-style-name="142" style:family="paragraph" style:name="P1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94">
      <style:text-properties fo:color="#1f1f1f" fo:font-family="Arial" style:font-family-asian="Arial" style:font-family-complex="Arial" fo:font-size="12pt" fo:font-weight="bold"/>
    </style:style>
    <style:style style:family="paragraph" style:name="P173">
      <style:paragraph-properties fo:line-height="115%" fo:margin-left="0cm" fo:margin-right="0cm" fo:text-indent="0cm" fo:margin-top="0pt" fo:margin-bottom="0pt" fo:border="none"/>
      <style:text-properties/>
    </style:style>
    <style:style style:family="text" style:name="T295">
      <style:text-properties fo:color="#1f1f1f" fo:font-family="Arial" style:font-family-asian="Arial" style:font-family-complex="Arial" fo:font-size="12pt"/>
    </style:style>
    <style:style style:parent-style-name="142" style:family="paragraph" style:name="P1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296">
      <style:text-properties fo:color="#1f1f1f" fo:font-family="Arial" style:font-family-asian="Arial" style:font-family-complex="Arial" fo:font-size="12pt" fo:font-weight="bold"/>
    </style:style>
    <style:style style:family="paragraph" style:name="P175">
      <style:paragraph-properties fo:line-height="115%" fo:margin-left="0cm" fo:margin-right="0cm" fo:text-indent="0cm" fo:margin-top="0pt" fo:margin-bottom="0pt" fo:border="none"/>
      <style:text-properties/>
    </style:style>
    <style:style style:family="text" style:name="T297">
      <style:text-properties fo:color="#1f1f1f" fo:font-family="Arial" style:font-family-asian="Arial" style:font-family-complex="Arial" fo:font-size="12pt"/>
    </style:style>
    <style:style style:parent-style-name="141" style:family="paragraph" style:name="P1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298">
      <style:text-properties fo:color="#1f1f1f" fo:font-family="Arial" style:font-family-asian="Arial" style:font-family-complex="Arial" fo:font-size="14pt" fo:font-weight="bold"/>
    </style:style>
    <style:style style:parent-style-name="668" style:list-style-name="WWNum8" style:family="paragraph" style:name="P177">
      <style:paragraph-properties fo:line-height="115%" fo:margin-right="0cm" fo:margin-top="0pt" fo:margin-bottom="0pt" fo:border="none"/>
      <style:text-properties/>
    </style:style>
    <style:style style:family="text" style:name="T299">
      <style:text-properties fo:color="#1f1f1f" fo:font-family="Arial" style:font-family-asian="Arial" style:font-family-complex="Arial" fo:font-size="12pt"/>
    </style:style>
    <style:style style:parent-style-name="668" style:list-style-name="WWNum8" style:family="paragraph" style:name="P178">
      <style:paragraph-properties fo:line-height="115%" fo:margin-right="0cm" fo:margin-top="0pt" fo:margin-bottom="0pt" fo:border="none"/>
      <style:text-properties/>
    </style:style>
    <style:style style:family="text" style:name="T300">
      <style:text-properties fo:color="#1f1f1f" fo:font-family="Arial" style:font-family-asian="Arial" style:font-family-complex="Arial" fo:font-size="12pt"/>
    </style:style>
    <style:style style:parent-style-name="668" style:list-style-name="WWNum8" style:family="paragraph" style:name="P179">
      <style:paragraph-properties fo:line-height="115%" fo:margin-right="0cm" fo:margin-top="0pt" fo:margin-bottom="0pt" fo:border="none"/>
      <style:text-properties/>
    </style:style>
    <style:style style:family="text" style:name="T301">
      <style:text-properties fo:color="#1f1f1f" fo:font-family="Arial" style:font-family-asian="Arial" style:font-family-complex="Arial" fo:font-size="12pt"/>
    </style:style>
    <style:style style:parent-style-name="668" style:list-style-name="WWNum8" style:family="paragraph" style:name="P180">
      <style:paragraph-properties fo:line-height="115%" fo:margin-right="0cm" fo:margin-top="0pt" fo:margin-bottom="0pt" fo:border="none"/>
      <style:text-properties/>
    </style:style>
    <style:style style:family="text" style:name="T302">
      <style:text-properties fo:color="#1f1f1f" fo:font-family="Arial" style:font-family-asian="Arial" style:font-family-complex="Arial" fo:font-size="12pt"/>
    </style:style>
    <style:style style:family="paragraph" style:name="P181">
      <style:paragraph-properties/>
      <style:text-properties/>
    </style:style>
    <style:style style:family="paragraph" style:name="P182">
      <style:paragraph-properties fo:line-height="115%" fo:margin-left="0cm" fo:margin-right="0cm" fo:text-indent="0cm" fo:margin-top="0pt" fo:margin-bottom="0pt" fo:break-before="page" fo:border="none"/>
      <style:text-properties/>
    </style:style>
    <style:style style:family="text" style:name="T303">
      <style:text-properties fo:color="#1f1f1f" fo:font-family="Arial" style:font-family-asian="Arial" style:font-family-complex="Arial" fo:font-size="12pt"/>
    </style:style>
    <style:style style:parent-style-name="141" style:family="paragraph" style:name="P18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04">
      <style:text-properties fo:color="#1f1f1f" fo:font-family="Arial" style:font-family-asian="Arial" style:font-family-complex="Arial" fo:font-size="14pt" fo:font-weight="bold"/>
    </style:style>
    <style:style style:family="paragraph" style:name="P184">
      <style:paragraph-properties fo:line-height="115%" fo:margin-left="0cm" fo:margin-right="0cm" fo:text-indent="0cm" fo:margin-top="0pt" fo:margin-bottom="0pt" fo:border="none"/>
      <style:text-properties/>
    </style:style>
    <style:style style:family="text" style:name="T305">
      <style:text-properties fo:color="#1f1f1f" fo:font-family="Arial" style:font-family-asian="Arial" style:font-family-complex="Arial" fo:font-size="12pt"/>
    </style:style>
    <style:style style:parent-style-name="142" style:family="paragraph" style:name="P1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06">
      <style:text-properties fo:color="#1f1f1f" fo:font-family="Arial" style:font-family-asian="Arial" style:font-family-complex="Arial" fo:font-size="12pt" fo:font-weight="bold"/>
    </style:style>
    <style:style style:family="paragraph" style:name="P186">
      <style:paragraph-properties fo:line-height="115%" fo:margin-left="0cm" fo:margin-right="0cm" fo:text-indent="0cm" fo:margin-top="0pt" fo:margin-bottom="0pt" fo:border="none"/>
      <style:text-properties/>
    </style:style>
    <style:style style:family="text" style:name="T307">
      <style:text-properties fo:color="#1f1f1f" fo:font-family="Arial" style:font-family-asian="Arial" style:font-family-complex="Arial" fo:font-size="12pt"/>
    </style:style>
    <style:style style:parent-style-name="142" style:family="paragraph" style:name="P1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08">
      <style:text-properties fo:color="#1f1f1f" fo:font-family="Arial" style:font-family-asian="Arial" style:font-family-complex="Arial" fo:font-size="12pt" fo:font-weight="bold"/>
    </style:style>
    <style:style style:family="paragraph" style:name="P188">
      <style:paragraph-properties fo:line-height="115%" fo:margin-left="0cm" fo:margin-right="0cm" fo:text-indent="0cm" fo:margin-top="0pt" fo:margin-bottom="0pt" fo:border="none"/>
      <style:text-properties/>
    </style:style>
    <style:style style:family="text" style:name="T309">
      <style:text-properties fo:color="#1f1f1f" fo:font-family="Arial" style:font-family-asian="Arial" style:font-family-complex="Arial" fo:font-size="12pt"/>
    </style:style>
    <style:style style:family="paragraph" style:name="P189">
      <style:paragraph-properties fo:line-height="115%" fo:margin-left="0cm" fo:margin-right="0cm" fo:text-indent="0cm" fo:margin-top="0pt" fo:margin-bottom="0pt" fo:border="none"/>
      <style:text-properties/>
    </style:style>
    <style:style style:family="text" style:name="T310">
      <style:text-properties fo:color="#1f1f1f" fo:font-family="Arial" style:font-family-asian="Arial" style:font-family-complex="Arial" fo:font-size="12pt"/>
    </style:style>
    <style:style style:parent-style-name="668" style:list-style-name="WWNum9" style:family="paragraph" style:name="P190">
      <style:paragraph-properties fo:line-height="115%" fo:margin-right="0cm" fo:margin-top="0pt" fo:margin-bottom="0pt" fo:border="none"/>
      <style:text-properties/>
    </style:style>
    <style:style style:family="text" style:name="T311">
      <style:text-properties fo:color="#1f1f1f" fo:font-family="Arial" style:font-family-asian="Arial" style:font-family-complex="Arial" fo:font-size="12pt"/>
    </style:style>
    <style:style style:parent-style-name="668" style:list-style-name="WWNum9" style:family="paragraph" style:name="P191">
      <style:paragraph-properties fo:line-height="115%" fo:margin-right="0cm" fo:margin-top="0pt" fo:margin-bottom="0pt" fo:border="none"/>
      <style:text-properties/>
    </style:style>
    <style:style style:family="text" style:name="T312">
      <style:text-properties fo:color="#1f1f1f" fo:font-family="Arial" style:font-family-asian="Arial" style:font-family-complex="Arial" fo:font-size="12pt"/>
    </style:style>
    <style:style style:parent-style-name="668" style:list-style-name="WWNum9" style:family="paragraph" style:name="P192">
      <style:paragraph-properties fo:line-height="115%" fo:margin-right="0cm" fo:margin-top="0pt" fo:margin-bottom="0pt" fo:border="none"/>
      <style:text-properties/>
    </style:style>
    <style:style style:family="text" style:name="T313">
      <style:text-properties fo:color="#1f1f1f" fo:font-family="Arial" style:font-family-asian="Arial" style:font-family-complex="Arial" fo:font-size="12pt"/>
    </style:style>
    <style:style style:parent-style-name="142" style:family="paragraph" style:name="P1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14">
      <style:text-properties fo:color="#1f1f1f" fo:font-family="Arial" style:font-family-asian="Arial" style:font-family-complex="Arial" fo:font-size="12pt" fo:font-weight="bold"/>
    </style:style>
    <style:style style:family="table" style:name="ta2">
      <style:paragraph-properties fo:line-height="100%" fo:margin-bottom="0pt"/>
      <style:table-properties style:width="10.49cm" fo:margin-left="0cm" table:align="left" style:use-optimal-column-width="true"/>
    </style:style>
    <style:style style:family="table-column" style:name="co4">
      <style:table-column-properties style:column-width="1.873cm" style:use-optimal-column-width="true"/>
    </style:style>
    <style:style style:family="table-column" style:name="co5">
      <style:table-column-properties style:column-width="3.479cm" style:use-optimal-column-width="true"/>
    </style:style>
    <style:style style:family="table-column" style:name="co6">
      <style:table-column-properties style:column-width="5.142cm" style:use-optimal-column-width="true"/>
    </style:style>
    <style:style style:family="table-row" style:name="ro4">
      <style:table-row-properties/>
    </style:style>
    <style:style style:family="table-cell" style:name="ce1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4">
      <style:paragraph-properties style:line-height-at-least="12pt" fo:margin-top="0pt" fo:margin-bottom="0pt"/>
      <style:text-properties/>
    </style:style>
    <style:style style:family="text" style:name="T315">
      <style:text-properties fo:color="#1f1f1f" fo:font-family="Arial" style:font-family-asian="Arial" style:font-family-complex="Arial" fo:font-size="12pt" fo:font-weight="bold"/>
    </style:style>
    <style:style style:family="table-cell" style:name="ce1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5">
      <style:paragraph-properties style:line-height-at-least="12pt" fo:margin-top="0pt" fo:margin-bottom="0pt"/>
      <style:text-properties/>
    </style:style>
    <style:style style:family="text" style:name="T316">
      <style:text-properties fo:color="#1f1f1f" fo:font-family="Arial" style:font-family-asian="Arial" style:font-family-complex="Arial" fo:font-size="12pt" fo:font-weight="bold"/>
    </style:style>
    <style:style style:family="table-cell" style:name="ce1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6">
      <style:paragraph-properties style:line-height-at-least="12pt" fo:margin-top="0pt" fo:margin-bottom="0pt"/>
      <style:text-properties/>
    </style:style>
    <style:style style:family="text" style:name="T317">
      <style:text-properties fo:color="#1f1f1f" fo:font-family="Arial" style:font-family-asian="Arial" style:font-family-complex="Arial" fo:font-size="12pt" fo:font-weight="bold"/>
    </style:style>
    <style:style style:family="table-row" style:name="ro5">
      <style:table-row-properties/>
    </style:style>
    <style:style style:family="table-cell" style:name="ce1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7">
      <style:paragraph-properties style:line-height-at-least="12pt" fo:margin-top="0pt" fo:margin-bottom="0pt"/>
      <style:text-properties/>
    </style:style>
    <style:style style:family="text" style:name="T318">
      <style:text-properties fo:color="#1f1f1f" fo:font-family="Arial" style:font-family-asian="Arial" style:font-family-complex="Arial" fo:font-size="12pt"/>
    </style:style>
    <style:style style:family="table-cell" style:name="ce1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8">
      <style:paragraph-properties style:line-height-at-least="12pt" fo:margin-top="0pt" fo:margin-bottom="0pt"/>
      <style:text-properties/>
    </style:style>
    <style:style style:family="text" style:name="T319">
      <style:text-properties fo:color="#1f1f1f" fo:font-family="Arial" style:font-family-asian="Arial" style:font-family-complex="Arial" fo:font-size="12pt"/>
    </style:style>
    <style:style style:family="table-cell" style:name="ce1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99">
      <style:paragraph-properties style:line-height-at-least="12pt" fo:margin-top="0pt" fo:margin-bottom="0pt"/>
      <style:text-properties/>
    </style:style>
    <style:style style:family="text" style:name="T320">
      <style:text-properties fo:color="#1f1f1f" fo:font-family="Arial" style:font-family-asian="Arial" style:font-family-complex="Arial" fo:font-size="12pt"/>
    </style:style>
    <style:style style:family="table-row" style:name="ro6">
      <style:table-row-properties/>
    </style:style>
    <style:style style:family="table-cell" style:name="ce1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00">
      <style:paragraph-properties style:line-height-at-least="12pt" fo:margin-top="0pt" fo:margin-bottom="0pt"/>
      <style:text-properties/>
    </style:style>
    <style:style style:family="text" style:name="T321">
      <style:text-properties fo:color="#1f1f1f" fo:font-family="Arial" style:font-family-asian="Arial" style:font-family-complex="Arial" fo:font-size="12pt"/>
    </style:style>
    <style:style style:family="table-cell" style:name="ce1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01">
      <style:paragraph-properties style:line-height-at-least="12pt" fo:margin-top="0pt" fo:margin-bottom="0pt"/>
      <style:text-properties/>
    </style:style>
    <style:style style:family="text" style:name="T322">
      <style:text-properties fo:color="#1f1f1f" fo:font-family="Arial" style:font-family-asian="Arial" style:font-family-complex="Arial" fo:font-size="12pt"/>
    </style:style>
    <style:style style:family="table-cell" style:name="ce2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02">
      <style:paragraph-properties style:line-height-at-least="12pt" fo:margin-top="0pt" fo:margin-bottom="0pt"/>
      <style:text-properties/>
    </style:style>
    <style:style style:family="text" style:name="T323">
      <style:text-properties fo:color="#1f1f1f" fo:font-family="Arial" style:font-family-asian="Arial" style:font-family-complex="Arial" fo:font-size="12pt"/>
    </style:style>
    <style:style style:family="paragraph" style:name="P203">
      <style:paragraph-properties fo:line-height="115%" fo:margin-left="0cm" fo:margin-right="0cm" fo:text-indent="0cm" fo:margin-top="0pt" fo:margin-bottom="0pt" fo:border="none"/>
      <style:text-properties/>
    </style:style>
    <style:style style:family="text" style:name="T324">
      <style:text-properties fo:color="#1f1f1f" fo:font-family="Arial" style:font-family-asian="Arial" style:font-family-complex="Arial" fo:font-size="12pt"/>
    </style:style>
    <style:style style:parent-style-name="142" style:family="paragraph" style:name="P20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25">
      <style:text-properties fo:color="#1f1f1f" fo:font-family="Arial" style:font-family-asian="Arial" style:font-family-complex="Arial" fo:font-size="12pt" fo:font-weight="bold"/>
    </style:style>
    <style:style style:family="paragraph" style:name="P205">
      <style:paragraph-properties fo:line-height="115%" fo:margin-left="0cm" fo:margin-right="0cm" fo:text-indent="0cm" fo:margin-top="0pt" fo:margin-bottom="0pt" fo:border="none"/>
      <style:text-properties/>
    </style:style>
    <style:style style:family="text" style:name="T326">
      <style:text-properties fo:color="#1f1f1f" fo:font-family="Arial" style:font-family-asian="Arial" style:font-family-complex="Arial" fo:font-size="12pt"/>
    </style:style>
    <style:style style:family="text" style:name="T327">
      <style:text-properties fo:color="#1f1f1f" fo:font-family="Arial" style:font-family-asian="Arial" style:font-family-complex="Arial" fo:font-size="12pt"/>
    </style:style>
    <style:style style:parent-style-name="141" style:family="paragraph" style:name="P20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28">
      <style:text-properties fo:color="#1f1f1f" fo:font-family="Arial" style:font-family-asian="Arial" style:font-family-complex="Arial" fo:font-size="14pt" fo:font-weight="bold"/>
    </style:style>
    <style:style style:parent-style-name="668" style:list-style-name="WWNum10" style:family="paragraph" style:name="P207">
      <style:paragraph-properties fo:line-height="115%" fo:margin-right="0cm" fo:margin-top="0pt" fo:margin-bottom="0pt" fo:border="none"/>
      <style:text-properties/>
    </style:style>
    <style:style style:family="text" style:name="T329">
      <style:text-properties fo:color="#1f1f1f" fo:font-family="Arial" style:font-family-asian="Arial" style:font-family-complex="Arial" fo:font-size="12pt"/>
    </style:style>
    <style:style style:parent-style-name="668" style:list-style-name="WWNum10" style:family="paragraph" style:name="P208">
      <style:paragraph-properties fo:line-height="115%" fo:margin-right="0cm" fo:margin-top="0pt" fo:margin-bottom="0pt" fo:border="none"/>
      <style:text-properties/>
    </style:style>
    <style:style style:family="text" style:name="T330">
      <style:text-properties fo:color="#1f1f1f" fo:font-family="Arial" style:font-family-asian="Arial" style:font-family-complex="Arial" fo:font-size="12pt"/>
    </style:style>
    <style:style style:parent-style-name="668" style:list-style-name="WWNum10" style:family="paragraph" style:name="P209">
      <style:paragraph-properties fo:line-height="115%" fo:margin-right="0cm" fo:margin-top="0pt" fo:margin-bottom="0pt" fo:border="none"/>
      <style:text-properties/>
    </style:style>
    <style:style style:family="text" style:name="T331">
      <style:text-properties fo:color="#1f1f1f" fo:font-family="Arial" style:font-family-asian="Arial" style:font-family-complex="Arial" fo:font-size="12pt"/>
    </style:style>
    <style:style style:parent-style-name="668" style:list-style-name="WWNum10" style:family="paragraph" style:name="P210">
      <style:paragraph-properties fo:line-height="115%" fo:margin-right="0cm" fo:margin-top="0pt" fo:margin-bottom="0pt" fo:border="none"/>
      <style:text-properties/>
    </style:style>
    <style:style style:family="text" style:name="T332">
      <style:text-properties fo:color="#1f1f1f" fo:font-family="Arial" style:font-family-asian="Arial" style:font-family-complex="Arial" fo:font-size="12pt"/>
    </style:style>
    <style:style style:family="paragraph" style:name="P211">
      <style:paragraph-properties/>
      <style:text-properties/>
    </style:style>
    <style:style style:parent-style-name="141" style:family="paragraph" style:name="P21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333">
      <style:text-properties fo:color="#1f1f1f" fo:font-family="Arial" style:font-family-asian="Arial" style:font-family-complex="Arial" fo:font-size="14pt" fo:font-weight="bold"/>
    </style:style>
    <style:style style:family="paragraph" style:name="P213">
      <style:paragraph-properties fo:line-height="115%" fo:margin-left="0cm" fo:margin-right="0cm" fo:text-indent="0cm" fo:margin-top="0pt" fo:margin-bottom="0pt" fo:border="none"/>
      <style:text-properties/>
    </style:style>
    <style:style style:family="text" style:name="T334">
      <style:text-properties fo:color="#1f1f1f" fo:font-family="Arial" style:font-family-asian="Arial" style:font-family-complex="Arial" fo:font-size="12pt"/>
    </style:style>
    <style:style style:parent-style-name="142" style:family="paragraph" style:name="P2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35">
      <style:text-properties fo:color="#1f1f1f" fo:font-family="Arial" style:font-family-asian="Arial" style:font-family-complex="Arial" fo:font-size="12pt" fo:font-weight="bold"/>
    </style:style>
    <style:style style:family="paragraph" style:name="P215">
      <style:paragraph-properties fo:line-height="115%" fo:margin-left="0cm" fo:margin-right="0cm" fo:text-indent="0cm" fo:margin-top="0pt" fo:margin-bottom="0pt" fo:border="none"/>
      <style:text-properties/>
    </style:style>
    <style:style style:family="text" style:name="T336">
      <style:text-properties fo:color="#1f1f1f" fo:font-family="Arial" style:font-family-asian="Arial" style:font-family-complex="Arial" fo:font-size="12pt"/>
    </style:style>
    <style:style style:parent-style-name="142" style:family="paragraph" style:name="P2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37">
      <style:text-properties fo:color="#1f1f1f" fo:font-family="Arial" style:font-family-asian="Arial" style:font-family-complex="Arial" fo:font-size="12pt" fo:font-weight="bold"/>
    </style:style>
    <style:style style:family="paragraph" style:name="P217">
      <style:paragraph-properties fo:line-height="115%" fo:margin-left="0cm" fo:margin-right="0cm" fo:text-indent="0cm" fo:margin-top="0pt" fo:margin-bottom="0pt" fo:border="none"/>
      <style:text-properties/>
    </style:style>
    <style:style style:family="text" style:name="T338">
      <style:text-properties fo:color="#1f1f1f" fo:font-family="Arial" style:font-family-asian="Arial" style:font-family-complex="Arial" fo:font-size="12pt"/>
    </style:style>
    <style:style style:parent-style-name="142" style:family="paragraph" style:name="P2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39">
      <style:text-properties fo:color="#1f1f1f" fo:font-family="Arial" style:font-family-asian="Arial" style:font-family-complex="Arial" fo:font-size="12pt" fo:font-weight="bold"/>
    </style:style>
    <style:style style:family="paragraph" style:name="P219">
      <style:paragraph-properties fo:line-height="115%" fo:margin-left="0cm" fo:margin-right="0cm" fo:text-indent="0cm" fo:margin-top="0pt" fo:margin-bottom="0pt" fo:border="none"/>
      <style:text-properties/>
    </style:style>
    <style:style style:family="text" style:name="T340">
      <style:text-properties fo:color="#1f1f1f" fo:font-family="Arial" style:font-family-asian="Arial" style:font-family-complex="Arial" fo:font-size="12pt"/>
    </style:style>
    <style:style style:family="paragraph" style:name="P220">
      <style:paragraph-properties fo:line-height="115%" fo:margin-left="0cm" fo:margin-right="0cm" fo:text-indent="0cm" fo:margin-top="0pt" fo:margin-bottom="0pt" fo:border="none"/>
      <style:text-properties/>
    </style:style>
    <style:style style:family="text" style:name="T341">
      <style:text-properties fo:color="#1f1f1f" fo:font-family="Arial" style:font-family-asian="Arial" style:font-family-complex="Arial" fo:font-size="12pt"/>
    </style:style>
    <style:style style:parent-style-name="668" style:list-style-name="WWNum11" style:family="paragraph" style:name="P221">
      <style:paragraph-properties fo:line-height="115%" fo:margin-right="0cm" fo:margin-top="0pt" fo:margin-bottom="0pt" fo:border="none"/>
      <style:text-properties/>
    </style:style>
    <style:style style:family="text" style:name="T342">
      <style:text-properties fo:color="#1f1f1f" fo:font-family="Arial" style:font-family-asian="Arial" style:font-family-complex="Arial" fo:font-size="12pt"/>
    </style:style>
    <style:style style:parent-style-name="668" style:list-style-name="WWNum11" style:family="paragraph" style:name="P222">
      <style:paragraph-properties fo:line-height="115%" fo:margin-right="0cm" fo:margin-top="0pt" fo:margin-bottom="0pt" fo:border="none"/>
      <style:text-properties/>
    </style:style>
    <style:style style:family="text" style:name="T343">
      <style:text-properties fo:color="#1f1f1f" fo:font-family="Arial" style:font-family-asian="Arial" style:font-family-complex="Arial" fo:font-size="12pt"/>
    </style:style>
    <style:style style:family="paragraph" style:name="P223">
      <style:paragraph-properties fo:line-height="115%" fo:margin-left="0cm" fo:margin-right="0cm" fo:text-indent="0cm" fo:margin-top="0pt" fo:margin-bottom="0pt" fo:border="none"/>
      <style:text-properties/>
    </style:style>
    <style:style style:family="text" style:name="T344">
      <style:text-properties fo:color="#1f1f1f" fo:font-family="Arial" style:font-family-asian="Arial" style:font-family-complex="Arial" fo:font-size="12pt"/>
    </style:style>
    <style:style style:parent-style-name="142" style:family="paragraph" style:name="P22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45">
      <style:text-properties fo:color="#1f1f1f" fo:font-family="Arial" style:font-family-asian="Arial" style:font-family-complex="Arial" fo:font-size="12pt" fo:font-weight="bold"/>
    </style:style>
    <style:style style:family="paragraph" style:name="P225">
      <style:paragraph-properties fo:line-height="115%" fo:margin-left="0cm" fo:margin-right="0cm" fo:text-indent="0cm" fo:margin-top="0pt" fo:margin-bottom="0pt" fo:border="none"/>
      <style:text-properties/>
    </style:style>
    <style:style style:family="text" style:name="T346">
      <style:text-properties fo:color="#1f1f1f" fo:font-family="Arial" style:font-family-asian="Arial" style:font-family-complex="Arial" fo:font-size="12pt"/>
    </style:style>
    <style:style style:parent-style-name="141" style:family="paragraph" style:name="P22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47">
      <style:text-properties fo:color="#1f1f1f" fo:font-family="Arial" style:font-family-asian="Arial" style:font-family-complex="Arial" fo:font-size="14pt" fo:font-weight="bold"/>
    </style:style>
    <style:style style:parent-style-name="668" style:list-style-name="WWNum11" style:family="paragraph" style:name="P227">
      <style:paragraph-properties fo:line-height="115%" fo:margin-right="0cm" fo:margin-top="0pt" fo:margin-bottom="0pt" fo:border="none"/>
      <style:text-properties/>
    </style:style>
    <style:style style:family="text" style:name="T348">
      <style:text-properties fo:color="#1f1f1f" fo:font-family="Arial" style:font-family-asian="Arial" style:font-family-complex="Arial" fo:font-size="12pt"/>
    </style:style>
    <style:style style:parent-style-name="668" style:list-style-name="WWNum11" style:family="paragraph" style:name="P228">
      <style:paragraph-properties fo:line-height="115%" fo:margin-right="0cm" fo:margin-top="0pt" fo:margin-bottom="0pt" fo:border="none"/>
      <style:text-properties/>
    </style:style>
    <style:style style:family="text" style:name="T349">
      <style:text-properties fo:color="#1f1f1f" fo:font-family="Arial" style:font-family-asian="Arial" style:font-family-complex="Arial" fo:font-size="12pt"/>
    </style:style>
    <style:style style:parent-style-name="668" style:list-style-name="WWNum11" style:family="paragraph" style:name="P229">
      <style:paragraph-properties fo:line-height="115%" fo:margin-right="0cm" fo:margin-top="0pt" fo:margin-bottom="0pt" fo:border="none"/>
      <style:text-properties/>
    </style:style>
    <style:style style:family="text" style:name="T350">
      <style:text-properties fo:color="#1f1f1f" fo:font-family="Arial" style:font-family-asian="Arial" style:font-family-complex="Arial" fo:font-size="12pt"/>
    </style:style>
    <style:style style:parent-style-name="668" style:list-style-name="WWNum11" style:family="paragraph" style:name="P230">
      <style:paragraph-properties fo:line-height="115%" fo:margin-right="0cm" fo:margin-top="0pt" fo:margin-bottom="0pt" fo:border="none"/>
      <style:text-properties/>
    </style:style>
    <style:style style:family="text" style:name="T351">
      <style:text-properties fo:color="#1f1f1f" fo:font-family="Arial" style:font-family-asian="Arial" style:font-family-complex="Arial" fo:font-size="12pt"/>
    </style:style>
    <style:style style:family="paragraph" style:name="P231">
      <style:paragraph-properties/>
      <style:text-properties/>
    </style:style>
    <style:style style:family="paragraph" style:name="P232">
      <style:paragraph-properties fo:line-height="115%" fo:margin-left="0cm" fo:margin-right="0cm" fo:text-indent="0cm" fo:margin-top="0pt" fo:margin-bottom="0pt" fo:break-before="page" fo:border="none"/>
      <style:text-properties/>
    </style:style>
    <style:style style:family="text" style:name="T352">
      <style:text-properties fo:color="#1f1f1f" fo:font-family="Arial" style:font-family-asian="Arial" style:font-family-complex="Arial" fo:font-size="12pt"/>
    </style:style>
    <style:style style:parent-style-name="141" style:family="paragraph" style:name="P2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53">
      <style:text-properties fo:color="#1f1f1f" fo:font-family="Arial" style:font-family-asian="Arial" style:font-family-complex="Arial" fo:font-size="14pt" fo:font-weight="bold"/>
    </style:style>
    <style:style style:family="paragraph" style:name="P234">
      <style:paragraph-properties fo:line-height="115%" fo:margin-left="0cm" fo:margin-right="0cm" fo:text-indent="0cm" fo:margin-top="0pt" fo:margin-bottom="0pt" fo:border="none"/>
      <style:text-properties/>
    </style:style>
    <style:style style:family="text" style:name="T354">
      <style:text-properties fo:color="#1f1f1f" fo:font-family="Arial" style:font-family-asian="Arial" style:font-family-complex="Arial" fo:font-size="12pt"/>
    </style:style>
    <style:style style:family="paragraph" style:name="P235">
      <style:paragraph-properties fo:line-height="115%" fo:margin-left="0cm" fo:margin-right="0cm" fo:text-indent="0cm" fo:margin-top="0pt" fo:margin-bottom="0pt" fo:border="none"/>
      <style:text-properties/>
    </style:style>
    <style:style style:family="text" style:name="T355">
      <style:text-properties fo:color="#1f1f1f" fo:font-family="Arial" style:font-family-asian="Arial" style:font-family-complex="Arial" fo:font-size="12pt"/>
    </style:style>
    <style:style style:family="paragraph" style:name="P236">
      <style:paragraph-properties fo:line-height="115%" fo:margin-left="0cm" fo:margin-right="0cm" fo:text-indent="0cm" fo:margin-top="0pt" fo:margin-bottom="0pt" fo:border="none"/>
      <style:text-properties/>
    </style:style>
    <style:style style:family="text" style:name="T356">
      <style:text-properties fo:color="#1f1f1f" fo:font-family="Arial" style:font-family-asian="Arial" style:font-family-complex="Arial" fo:font-size="12pt"/>
    </style:style>
    <style:style style:family="paragraph" style:name="P237">
      <style:paragraph-properties fo:line-height="115%" fo:margin-left="0cm" fo:margin-right="0cm" fo:text-indent="0cm" fo:margin-top="0pt" fo:margin-bottom="0pt" fo:border="none"/>
      <style:text-properties/>
    </style:style>
    <style:style style:family="text" style:name="T357">
      <style:text-properties fo:color="#1f1f1f" fo:font-family="Arial" style:font-family-asian="Arial" style:font-family-complex="Arial" fo:font-size="12pt"/>
    </style:style>
    <style:style style:family="paragraph" style:name="P238">
      <style:paragraph-properties fo:line-height="115%" fo:margin-left="0cm" fo:margin-right="0cm" fo:text-indent="0cm" fo:margin-top="0pt" fo:margin-bottom="0pt" fo:border="none"/>
      <style:text-properties/>
    </style:style>
    <style:style style:family="text" style:name="T358">
      <style:text-properties fo:color="#1f1f1f" fo:font-family="Arial" style:font-family-asian="Arial" style:font-family-complex="Arial" fo:font-size="12pt"/>
    </style:style>
    <style:style style:parent-style-name="141" style:family="paragraph" style:name="P23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59">
      <style:text-properties fo:color="#1f1f1f" fo:font-family="Arial" style:font-family-asian="Arial" style:font-family-complex="Arial" fo:font-size="14pt" fo:font-weight="bold"/>
    </style:style>
    <style:style style:parent-style-name="668" style:list-style-name="WWNum12" style:family="paragraph" style:name="P240">
      <style:paragraph-properties fo:line-height="115%" fo:margin-right="0cm" fo:margin-top="0pt" fo:margin-bottom="0pt" fo:border="none"/>
      <style:text-properties/>
    </style:style>
    <style:style style:family="text" style:name="T360">
      <style:text-properties fo:color="#1f1f1f" fo:font-family="Arial" style:font-family-asian="Arial" style:font-family-complex="Arial" fo:font-size="12pt"/>
    </style:style>
    <style:style style:parent-style-name="668" style:list-style-name="WWNum12" style:family="paragraph" style:name="P241">
      <style:paragraph-properties fo:line-height="115%" fo:margin-right="0cm" fo:margin-top="0pt" fo:margin-bottom="0pt" fo:border="none"/>
      <style:text-properties/>
    </style:style>
    <style:style style:family="text" style:name="T361">
      <style:text-properties fo:color="#1f1f1f" fo:font-family="Arial" style:font-family-asian="Arial" style:font-family-complex="Arial" fo:font-size="12pt"/>
    </style:style>
    <style:style style:parent-style-name="668" style:list-style-name="WWNum12" style:family="paragraph" style:name="P242">
      <style:paragraph-properties fo:line-height="115%" fo:margin-right="0cm" fo:margin-top="0pt" fo:margin-bottom="0pt" fo:border="none"/>
      <style:text-properties/>
    </style:style>
    <style:style style:family="text" style:name="T362">
      <style:text-properties fo:color="#1f1f1f" fo:font-family="Arial" style:font-family-asian="Arial" style:font-family-complex="Arial" fo:font-size="12pt"/>
    </style:style>
    <style:style style:parent-style-name="668" style:list-style-name="WWNum12" style:family="paragraph" style:name="P243">
      <style:paragraph-properties fo:line-height="115%" fo:margin-right="0cm" fo:margin-top="0pt" fo:margin-bottom="0pt" fo:border="none"/>
      <style:text-properties/>
    </style:style>
    <style:style style:family="text" style:name="T363">
      <style:text-properties fo:color="#1f1f1f" fo:font-family="Arial" style:font-family-asian="Arial" style:font-family-complex="Arial" fo:font-size="12pt"/>
    </style:style>
    <style:style style:family="paragraph" style:name="P244">
      <style:paragraph-properties/>
      <style:text-properties/>
    </style:style>
    <style:style style:family="paragraph" style:name="P245">
      <style:paragraph-properties fo:line-height="115%" fo:margin-left="0cm" fo:margin-right="0cm" fo:text-indent="0cm" fo:margin-top="0pt" fo:margin-bottom="0pt" fo:break-before="page" fo:border="none"/>
      <style:text-properties/>
    </style:style>
    <style:style style:family="text" style:name="T364">
      <style:text-properties fo:color="#1f1f1f" fo:font-family="Arial" style:font-family-asian="Arial" style:font-family-complex="Arial" fo:font-size="12pt"/>
    </style:style>
    <style:style style:parent-style-name="141" style:family="paragraph" style:name="P24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65">
      <style:text-properties fo:color="#1f1f1f" fo:font-family="Arial" style:font-family-asian="Arial" style:font-family-complex="Arial" fo:font-size="14pt" fo:font-weight="bold"/>
    </style:style>
    <style:style style:family="paragraph" style:name="P247">
      <style:paragraph-properties fo:line-height="115%" fo:margin-left="0cm" fo:margin-right="0cm" fo:text-indent="0cm" fo:margin-top="0pt" fo:margin-bottom="0pt" fo:border="none"/>
      <style:text-properties/>
    </style:style>
    <style:style style:family="text" style:name="T366">
      <style:text-properties fo:color="#1f1f1f" fo:font-family="Arial" style:font-family-asian="Arial" style:font-family-complex="Arial" fo:font-size="12pt"/>
    </style:style>
    <style:style style:parent-style-name="142" style:family="paragraph" style:name="P2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67">
      <style:text-properties fo:color="#1f1f1f" fo:font-family="Arial" style:font-family-asian="Arial" style:font-family-complex="Arial" fo:font-size="12pt" fo:font-weight="bold"/>
    </style:style>
    <style:style style:family="paragraph" style:name="P249">
      <style:paragraph-properties fo:line-height="115%" fo:margin-left="0cm" fo:margin-right="0cm" fo:text-indent="0cm" fo:margin-top="0pt" fo:margin-bottom="0pt" fo:border="none"/>
      <style:text-properties/>
    </style:style>
    <style:style style:family="text" style:name="T368">
      <style:text-properties fo:color="#1f1f1f" fo:font-family="Arial" style:font-family-asian="Arial" style:font-family-complex="Arial" fo:font-size="12pt"/>
    </style:style>
    <style:style style:parent-style-name="142" style:family="paragraph" style:name="P2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69">
      <style:text-properties fo:color="#1f1f1f" fo:font-family="Arial" style:font-family-asian="Arial" style:font-family-complex="Arial" fo:font-size="12pt" fo:font-weight="bold"/>
    </style:style>
    <style:style style:family="paragraph" style:name="P251">
      <style:paragraph-properties fo:line-height="115%" fo:margin-left="0cm" fo:margin-right="0cm" fo:text-indent="0cm" fo:margin-top="0pt" fo:margin-bottom="0pt" fo:border="none"/>
      <style:text-properties/>
    </style:style>
    <style:style style:family="text" style:name="T370">
      <style:text-properties fo:color="#1f1f1f" fo:font-family="Arial" style:font-family-asian="Arial" style:font-family-complex="Arial" fo:font-size="12pt"/>
    </style:style>
    <style:style style:parent-style-name="142" style:family="paragraph" style:name="P2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71">
      <style:text-properties fo:color="#1f1f1f" fo:font-family="Arial" style:font-family-asian="Arial" style:font-family-complex="Arial" fo:font-size="12pt" fo:font-weight="bold"/>
    </style:style>
    <style:style style:family="paragraph" style:name="P253">
      <style:paragraph-properties fo:line-height="115%" fo:margin-left="0cm" fo:margin-right="0cm" fo:text-indent="0cm" fo:margin-top="0pt" fo:margin-bottom="0pt" fo:border="none"/>
      <style:text-properties/>
    </style:style>
    <style:style style:family="text" style:name="T372">
      <style:text-properties fo:color="#1f1f1f" fo:font-family="Arial" style:font-family-asian="Arial" style:font-family-complex="Arial" fo:font-size="12pt"/>
    </style:style>
    <style:style style:parent-style-name="142" style:family="paragraph" style:name="P2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373">
      <style:text-properties fo:color="#1f1f1f" fo:font-family="Arial" style:font-family-asian="Arial" style:font-family-complex="Arial" fo:font-size="12pt" fo:font-weight="bold"/>
    </style:style>
    <style:style style:family="paragraph" style:name="P255">
      <style:paragraph-properties fo:line-height="115%" fo:margin-left="0cm" fo:margin-right="0cm" fo:text-indent="0cm" fo:margin-top="0pt" fo:margin-bottom="0pt" fo:border="none"/>
      <style:text-properties/>
    </style:style>
    <style:style style:family="text" style:name="T374">
      <style:text-properties fo:color="#1f1f1f" fo:font-family="Arial" style:font-family-asian="Arial" style:font-family-complex="Arial" fo:font-size="12pt"/>
    </style:style>
    <style:style style:parent-style-name="141" style:family="paragraph" style:name="P25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375">
      <style:text-properties fo:color="#1f1f1f" fo:font-family="Arial" style:font-family-asian="Arial" style:font-family-complex="Arial" fo:font-size="14pt" fo:font-weight="bold"/>
    </style:style>
    <style:style style:parent-style-name="668" style:list-style-name="WWNum13" style:family="paragraph" style:name="P257">
      <style:paragraph-properties fo:line-height="115%" fo:margin-right="0cm" fo:margin-top="0pt" fo:margin-bottom="0pt" fo:border="none"/>
      <style:text-properties/>
    </style:style>
    <style:style style:family="text" style:name="T376">
      <style:text-properties fo:color="#1f1f1f" fo:font-family="Arial" style:font-family-asian="Arial" style:font-family-complex="Arial" fo:font-size="12pt"/>
    </style:style>
    <style:style style:parent-style-name="668" style:list-style-name="WWNum13" style:family="paragraph" style:name="P258">
      <style:paragraph-properties fo:line-height="115%" fo:margin-right="0cm" fo:margin-top="0pt" fo:margin-bottom="0pt" fo:border="none"/>
      <style:text-properties/>
    </style:style>
    <style:style style:family="text" style:name="T377">
      <style:text-properties fo:color="#1f1f1f" fo:font-family="Arial" style:font-family-asian="Arial" style:font-family-complex="Arial" fo:font-size="12pt"/>
    </style:style>
    <style:style style:parent-style-name="668" style:list-style-name="WWNum13" style:family="paragraph" style:name="P259">
      <style:paragraph-properties fo:line-height="115%" fo:margin-right="0cm" fo:margin-top="0pt" fo:margin-bottom="0pt" fo:border="none"/>
      <style:text-properties/>
    </style:style>
    <style:style style:family="text" style:name="T378">
      <style:text-properties fo:color="#1f1f1f" fo:font-family="Arial" style:font-family-asian="Arial" style:font-family-complex="Arial" fo:font-size="12pt"/>
    </style:style>
    <style:style style:parent-style-name="668" style:list-style-name="WWNum13" style:family="paragraph" style:name="P260">
      <style:paragraph-properties fo:line-height="115%" fo:margin-right="0cm" fo:margin-top="0pt" fo:margin-bottom="0pt" fo:border="none"/>
      <style:text-properties/>
    </style:style>
    <style:style style:family="text" style:name="T379">
      <style:text-properties fo:color="#1f1f1f" fo:font-family="Arial" style:font-family-asian="Arial" style:font-family-complex="Arial" fo:font-size="12pt"/>
    </style:style>
    <style:style style:family="paragraph" style:name="P261">
      <style:paragraph-properties/>
      <style:text-properties/>
    </style:style>
  </office:automatic-styles>
  <office:body>
    <office:text text:use-soft-page-breaks="true">
      <text:p text:style-name="P33"><text:span text:style-name="T149">157. 자궁 속 탁태와 수행의 신비로운 정화 원리</text:span><text:span/></text:p>
      <text:p text:style-name="P34"><text:span text:style-name="T150">🔑 핵심 키워드: 탁태와 탄생, 생기차제 화신, 원만차제 환신, 정화의 기틀</text:span><text:span/></text:p>
      <text:p text:style-name="P35"><text:span text:style-name="T151">👶 화신으로 전환되는 탄생의 여정</text:span><text:span/></text:p>
      <text:p text:style-name="P36"><text:span text:style-name="T152">바르도 유정이 모태의 자궁에 자리를 잡고 마침내 새로운 생명으로 태어나는 모든 단계는 밀교의 생기차제 수행과 아주 깊은 연관이 있어. 생기차제에서는 평범한 인간의 탄생 과정을 부처의 화신으로 바꾸어 놓는 명상을 펼치거든. 이것은 마치 뛰어난 연극배우가 무대 뒤에서 평범한 옷을 벗고 화려한 영웅의 의상을 입은 채 무대 위로 당당하게 걸어 나오는 과정과 같아. 우리의 평범한 태어남을 깨달은 존재의 순수한 출현으로 리모델링하는 놀라운 수행법이지.</text:span><text:span/></text:p>
      <text:p text:style-name="P37"><text:span text:style-name="T153">🔮 환신과 화신의 차원 높은 변형</text:span><text:span/></text:p>
      <text:p text:style-name="P38"><text:span text:style-name="T154">원만차제 수행의 관점에서 보면 이 탁태와 탄생의 과정은 청정환신이나 부정환신이 거친 형태의 화신으로 변형되는 원리와 완벽하게 닮아 있어. 수행을 통해 완성된 미세한 에너지의 몸이 이전의 육체에 다시 들어가거나 범부들의 눈앞에 평범한 모습으로 나타나는 메커니즘을 그대로 보여주는 거야. 최첨단 소프트웨어가 구형 컴퓨터 하드웨어에 완벽하게 호환되어 부팅되거나, 눈에 보이지 않던 미세한 전파가 모니터 화면의 선명한 그래픽 영상으로 구현되는 신비로운 기술과 똑같다</text:span><text:span text:style-name="T155">고 볼 수 있어.</text:span><text:span/></text:p>
      <text:p text:style-name="P39"><text:span text:style-name="T156">🧼 깨달음의 기틀이 되는 정화의 대상</text:span><text:span/></text:p>
      <text:p text:style-name="P40"><text:span text:style-name="T157">자궁 속에서 자라나 세상 밖으로 나오는 이 자연적인 생명 현상들은 생기차제와 원만차제라는 높은 차원의 수행을 통해 완벽하게 씻겨 나가야 할 정화의 대상이 돼. 밀교에서는 이를 수행의 기틀을 다지는 바탕이라고 부르는데, 가공되지 않은 거친 원자재를 정밀하게 제련해야만 순도 높은 황금을 얻을 수 있는 것과 같은 이치야. 우리가 겪는 범속한 탄생의 과정 자체가 역설적이게도 가장 위대한 부처의 몸을 빚어낼 수 있는 최고의 영적 실험실이자 재료가 되는 셈이지.</text:span><text:span/></text:p>
      <text:p text:style-name="P41"><text:span text:style-name="T158">🗺️ 생사의 윤회를 깨달음의 지도로 바꾸는 지혜</text:span><text:span/></text:p>
      <text:p text:style-name="P42"><text:span text:style-name="T159">결국 태어나고 자라는 이 모든 생물학적 메커니즘을 명확하게 꿰뚫어 보는 것이야말로 밀교 성불 원리의 핵심을 장악하는 지름길이야. 평범한 생명 탄생의 비밀 속에 숨겨진 부처의 몸의 설계도를 발견하고, 이를 수행을 통해 신성한 영역으로 승화시킬 때 비로소 윤회의 고리가 끊어지게 돼. 이 정밀한 구조적 연결 고리를 바르게 이해할 때 사후의 혼란스러운 여정은 방황이 아니라 깨달음을 향해 정확하게 나아가는 영광스러운 지도로 뒤바뀌게 될 거야.</text:span><text:span/></text:p>
      <text:p text:style-name="P43"><text:span text:style-name="T160">📝 핵심 요약</text:span><text:span/></text:p>
      <text:list text:style-name="WWNum1" text:continue-numbering="true">
        <text:list-item>
          <text:p text:style-name="P44"><text:span text:style-name="T161">바르도 유정이 자궁에 안착하여 탄생하는 과정은 생기차제에서 탄생을 화신으로 전환하는 수행의 바탕이 된다.</text:span><text:span/></text:p>
        </text:list-item>
        <text:list-item>
          <text:p text:style-name="P45"><text:span text:style-name="T162">이 과정은 원만차제의 청정환신과 부정환신이 거친 화신의 몸을 입고 인간 세상에 나타나는 원리와 정확히 일치한다.</text:span><text:span/></text:p>
        </text:list-item>
        <text:list-item>
          <text:p text:style-name="P46"><text:span text:style-name="T163">자연적이고 범속한 입태와 탄생 현상은 밀교의 깊은 명상을 통해 부처의 지혜로 탈바꿈해야 할 핵심 정화 대상이다.</text:span><text:span/></text:p>
        </text:list-item>
        <text:list-item>
          <text:p text:style-name="P47"><text:span text:style-name="T164">생사 윤회의 전 과정을 정화의 기틀로 삼음으로써 평범한 출생의 고리를 깨달음의 신성한 출현으로 승화시킨다.</text:span><text:span/></text:p>
        </text:list-item>
      </text:list>
      <text:p text:style-name="P48"><text:span><text:soft-page-break/></text:span><text:span/><text:span/></text:p>
      <text:p text:style-name="P49"><text:span text:style-name="T165">[🟢 Online Mode | 26.06.05_16:06:56]</text:span><text:span/></text:p>
      <text:p text:style-name="P50"><text:span text:style-name="T166">158. 평범한 생로병사를 부처의 삼신으로 바꾸는 위대한 전환</text:span><text:span/></text:p>
      <text:p text:style-name="P51"><text:span text:style-name="T167">🔑 핵심 키워드: 생기차제, 정화 대상, 삼신 성취, 람켸르(길로 가져옴)</text:span><text:span/></text:p>
      <text:p text:style-name="P52"><text:span text:style-name="T168">🌀 우리가 바꿀 세 가지 낡은 원재료</text:span><text:span/></text:p>
      <text:p text:style-name="P53"><text:span text:style-name="T169">우리가 매일 윤회하며 반복하는 평범한 죽음, 죽은 뒤 영혼이 방황하는 바르도, 그리고 다시 육체를 받고 태어나는 탄생의 과정은 깨달음을 얻기 위해 반드시 깨끗하게 청소해야 할 세 가지 근본 무대야. 마치 공장에서 버려진 고철과 폐플라스틱을 수거해 최고급 명품 부품으로 재활용하듯이, 우리가 겪는 범속한 삶과 죽음의 순환 고리 자체를 정화의 핵심 원재료로 삼는 거지. 생기차제 수행은 이 세 가지 단계의 에너지를 고스란히 영적인 길로 이끄는 고도의 전환 기술이</text:span><text:span text:style-name="T170">야.</text:span><text:span/></text:p>
      <text:p text:style-name="P54"><text:span text:style-name="T171">🌌 범속한 죽음을 우주의 진리(법신)로 바꾸는 법</text:span><text:span/></text:p>
      <text:p text:style-name="P55"><text:span text:style-name="T172">[변환 대상] 숨이 끊어지는 평범한 죽음의 순간</text:span><text:span/></text:p>
      <text:p text:style-name="P56"><text:span text:style-name="T173">[수행 방법] 죽음의 과정에서 나타나는 미세한 공성을 명상으로 포착 (람켸르)</text:span><text:span/></text:p>
      <text:p text:style-name="P57"><text:span text:style-name="T174">[최종 결실] 우주의 근본 진리와 하나가 되는 부처님의 법신(다르마까야) 성취</text:span><text:span/></text:p>
      <text:p text:style-name="P58"><text:span text:style-name="T175"/><text:span/></text:p>
      <text:p text:style-name="P59"><text:span text:style-name="T176">이 과정은 마치 컴퓨터가 완전히 꺼지기 직전, 시스템 내부에 쌓여 있던 모든 불필요한 캐시 파일과 데이터 에러를 완벽하게 포맷하여 깨끗한 최초의 순수 운영체제 상태로 되돌리는 것과 똑같아. 평범한 죽음의 순간에 밀려오는 어둠을 명상의 힘으로 뚫어내어 궁극의 진리라는 빛으로 승화시키는 첫 번째 비밀 기법이지.</text:span><text:span/></text:p>
      <text:p text:style-name="P60"><text:span text:style-name="T177">✨ 방황하는 의생신을 찬란한 빛(보신)으로 입히기</text:span><text:span/></text:p>
      <text:list text:style-name="WWNum2" text:continue-numbering="true">
        <text:list-item>
          <text:p text:style-name="P61"><text:span text:style-name="T178">중간 상태의 정화</text:span><text:span text:style-name="T179">: 육체를 잃고 의식만으로 허공을 떠도는 바르도의 미세한 몸(의생신)을 정화함.</text:span><text:span/></text:p>
        </text:list-item>
        <text:list-item>
          <text:p text:style-name="P62"><text:span text:style-name="T180">에너지의 신성화</text:span><text:span text:style-name="T181">: 불안정하게 흔들리는 이 미세한 의식을 부처님의 찬란한 공덕의 몸인 보신(쌈보가까야)의 길로 전환함.</text:span><text:span/></text:p>
        </text:list-item>
        <text:list-item>
          <text:p text:style-name="P63"><text:span text:style-name="T182">직관적 비유</text:span><text:span text:style-name="T183">: 새로운 게임을 시작하기 전, 모니터 화면 속에 가상의 3D 홀로그램 캐릭터를 아주 정교하고 눈부신 빛의 형태로 먼저 디자인해 두는 단계라고 이해하면 돼.</text:span><text:span/></text:p>
        </text:list-item>
      </text:list>
      <text:p text:style-name="P64"><text:span text:style-name="T184">🌍 거친 재탄생을 자비로운 구원(화신)으로 완성하기</text:span><text:span/></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65"><text:span text:style-name="T185">구분</text:span><text:span/></text:p>
          </table:table-cell>
          <table:table-cell table:style-name="ce3">
            <text:p text:style-name="P66"><text:span text:style-name="T186">범속한 상태</text:span><text:span/></text:p>
          </table:table-cell>
          <table:table-cell table:style-name="ce4">
            <text:p text:style-name="P67"><text:span text:style-name="T187">정화된 상태 (화신)</text:span><text:span/></text:p>
          </table:table-cell>
        </table:table-row>
        <table:table-row table:style-name="ro2" table:default-cell-style-name="ce1">
          <table:table-cell table:style-name="ce5">
            <text:p text:style-name="P68"><text:span text:style-name="T188">태어남의 본질</text:span><text:span/></text:p>
          </table:table-cell>
          <table:table-cell table:style-name="ce6">
            <text:p text:style-name="P69"><text:span text:style-name="T189">과거의 업력에 이끌려 불가피하게 자궁에 갇힘</text:span><text:span/></text:p>
          </table:table-cell>
          <table:table-cell table:style-name="ce7">
            <text:p text:style-name="P70"><text:span text:style-name="T190">중생을 구제하기 위해 자발적으로 역사적 육신을 입음</text:span><text:span/></text:p>
          </table:table-cell>
        </table:table-row>
        <table:table-row table:style-name="ro3" table:default-cell-style-name="ce1">
          <table:table-cell table:style-name="ce8">
            <text:p text:style-name="P71"><text:span text:style-name="T191">비유적 표현</text:span><text:span/></text:p>
          </table:table-cell>
          <table:table-cell table:style-name="ce9">
            <text:p text:style-name="P72"><text:span text:style-name="T192">통제 불능의 무서운 롤러코스터에 탑승한 상태</text:span><text:span/></text:p>
          </table:table-cell>
          <table:table-cell table:style-name="ce10">
            <text:p text:style-name="P73"><text:span text:style-name="T193">구조대원이 조난자를 구하러 특수 장비를 입고 현장에 뛰어듦</text:span><text:span/></text:p>
          </table:table-cell>
        </table:table-row>
      </table:table>
      <text:p text:style-name="P74"><text:span text:style-name="T194">이처럼 마지막 탄생의 순간을 부처님의 자비로운 화신(니르마나까야)으로 완전히 바꾸어 냄으로써, 무겁고 고통스럽던 윤회의 톱니바퀴는 완벽한 삼신의 깨달음으로 아름답게 마감하게 돼.</text:span><text:span/></text:p>
      <text:p text:style-name="P75"><text:span text:style-name="T195">📝 핵심 요약</text:span><text:span/></text:p>
      <text:list text:style-name="WWNum2" text:continue-numbering="true">
        <text:list-item>
          <text:p text:style-name="P76"><text:span text:style-name="T196">생기차제와 원만차제는 평범한 죽음, 바르도, 탄생이라는 세 가지 무대를 정화의 대상으로 삼음.</text:span><text:span/></text:p>
        </text:list-item>
        <text:list-item>
          <text:p text:style-name="P77"><text:span text:style-name="T197">범속한 죽음의 순간을 명상으로 정화하여 우주의 근본 진리인 법신(다르마까야)을 성취함.</text:span><text:span/></text:p>
        </text:list-item>
        <text:list-item>
          <text:p text:style-name="P78"><text:span text:style-name="T198">허공을 떠도는 바르도의 의생신을 부처님의 찬란한 공덕과 빛의 몸인 보신(쌈보가까야)으로 전환함.</text:span><text:span/></text:p>
        </text:list-item>
        <text:list-item>
          <text:p text:style-name="P79"><text:span text:style-name="T199">업에 끌려 태어나는 마지막 탄생의 과정을 중생 구제를 위한 자비의 화신(니르마나까야)으로 완성함.</text:span><text:span/></text:p>
        </text:list-item>
      </text:list>
      <text:p text:style-name="P80"><text:span><text:soft-page-break/></text:span><text:span/><text:span/></text:p>
      <text:p text:style-name="P81"><text:span text:style-name="T200">159. 원만차제의 정화 메커니즘과 궁극의 빛</text:span><text:span/></text:p>
      <text:p text:style-name="P82"><text:span text:style-name="T201">🔑 핵심 키워드: 원만차제, 정화, 신적, 죽음의 정광명</text:span><text:span/></text:p>
      <text:p text:style-name="P83"><text:span text:style-name="T202">🧘 원만차제는 우리가 필연적으로 겪게 되는 자연적인 죽음, 바르도, 그리고 다시 태어남이라는 세 가지 무대를 완벽하게 청소하고 정화하는 인체의 최종 행법이야. 평소에 먼지가 잔뜩 쌓인 거울을 깨끗한 천으로 닦아내면 거울 본연의 맑은 면이 그대로 드러나듯이, 이 수행은 죽음의 과정 뒤에 숨겨진 가장 순수한 의식을 복원하는 역할을 하지. 죽음이라는 무겁고 어두운 사건을 영적인 대청소의 기회로 바꾸는 아주 놀라운 연금술이라고 생각하면 돼.</text:span><text:span/></text:p>
      <text:p text:style-name="P84"><text:span text:style-name="T203">💀 이 정화의 핵심은 우리 내면의 가장 깊은 곳에 자리 잡은 죽음의 정광명과 명상 속의 상태를 한 치의 오차도 없이 일치시키는 데 있어. 우리가 현실에서 죽음을 맞이할 때 의식이 거쳐 가는 정교한 단계들을, 원만차제 수행자는 명상 속에서 그대로 재현해 내는 거지. 마치 실제 비행기를 조종하기 전에 정밀한 비행 시뮬레이터에 탑승해서 이착륙의 모든 기류 변화를 완벽하게 몸으로 익히는 과정과 똑같아.</text:span><text:span/></text:p>
      <text:p text:style-name="P85"><text:span text:style-name="T204">🌬️ 이러한 정밀한 시뮬레이션은 신체와 언어, 그리고 마음의 거친 움직임을 차례대로 가라앉히는 신적, 어적, 심적이라는 단계를 거치며 완벽해져. 이 과정에서 의식은 사물을 평소와 다르게 인식하는 현명, 한층 더 밝아지는 증휘, 그리고 궁극의 고요에 가까워지는 근득이라는 세 가지 미세한 마음의 상태를 차례로 경험하게 되지. 스마트폰의 여러 앱을 하나씩 종료하다가 마침내 운영체제의 가장 깊은 핵심 모드에 진입하는 시스템 최적화 흐름과 매우 닮아 있어.</text:span><text:span/></text:p>
      <text:p text:style-name="P86"><text:span text:style-name="T205">✨ 마지막으로 환신과 유학쌍운의 단계에 이르면, 수행자는 거친 육체의 제약을 완전히 벗어난 미세한 에너지의 몸을 형성하고 마침내 원초의 빛인 죽음의 정광명과 완전히 하나로 융합하게 돼. 밤하늘을 빽빽하게 가득 채우고 있던 먹구름이 완벽하게 걷히면서 온 우주를 비추는 거대한 보름달의 빛이 온전히 드러나는 장관과 같지. 이 위대한 원만차제의 원리를 통해 평범한 소멸에 불과했던 죽음은 마침내 영원한 자유와 깨달음을 성취하는 성불의 문으로 완벽하게 탈바꿈하게 되</text:span><text:span text:style-name="T206">는 거야.</text:span><text:span/></text:p>
      <text:p text:style-name="P87"><text:span text:style-name="T207">📝 핵심 요약</text:span><text:span/></text:p>
      <text:list text:style-name="WWNum3" text:continue-numbering="true">
        <text:list-item>
          <text:p text:style-name="P88"><text:span text:style-name="T208">원만차제는 죽음, 바르도, 탄생의 세 가지 과정을 본질적으로 정화하는 고차원적 수행임</text:span><text:span/></text:p>
        </text:list-item>
        <text:list-item>
          <text:p text:style-name="P89"><text:span text:style-name="T209">명상 속에서 실제 죽음의 단계들을 정밀하게 재현하여 일치시키는 시뮬레이션 과정임</text:span><text:span/></text:p>
        </text:list-item>
        <text:list-item>
          <text:p text:style-name="P90"><text:span text:style-name="T210">신적, 어적, 심적 단계를 통해 거친 에너지를 가라앉히고 현명, 증휘, 근득의 미세한 마음을 깨움</text:span><text:span/></text:p>
        </text:list-item>
        <text:list-item>
          <text:p text:style-name="P91"><text:span text:style-name="T211">환신과 유학쌍운을 거쳐 궁극의 죽음의 정광명과 융합함으로써 깨달음의 성불을 성취함</text:span><text:span/></text:p>
        </text:list-item>
      </text:list>
      <text:p text:style-name="P92"><text:span><text:soft-page-break/></text:span><text:span/><text:span/></text:p>
      <text:p text:style-name="P93"><text:span text:style-name="T212">160. 환신과 바르도 그리고 탄생의 심오한 닮은꼴</text:span><text:span/></text:p>
      <text:p text:style-name="P94"><text:span text:style-name="T213">🔑 핵심 키워드: 부정환신, 청정환신, 바르도, 유학쌍운, 탄생의 일치</text:span><text:span/></text:p>
      <text:p text:style-name="P95"><text:span text:style-name="T214">🎭 바르도라는 무대와 부정환신의 정교한 싱크로율</text:span><text:span/></text:p>
      <text:p text:style-name="P96"><text:span text:style-name="T215">무상유가딴뜨라의 깊은 수행 단계 중 하나인 부정환신은, 우리가 죽은 뒤 새로운 몸을 받기 전 허공을 떠도는 바르도(중유)의 상태와 본질적으로 완벽하게 닮아 있어. 이것은 영화 촬영장에서 본편 촬영에 들어가기 전, 가상의 세트장에서 특수 분장을 하고 연기를 연습하는 리허설 무대와 아주 비슷하지. 아직 모든 번뇌가 완벽하게 정화되지는 않았지만, 거친 육체의 속박에서 벗어나 미세한 에너지의 몸으로 존재한다는 점에서 바르도 유정의 상태와 아주 정교한 싱크로율을 </text:span><text:span text:style-name="T216">보여주는 단계야.</text:span><text:span/></text:p>
      <text:p text:style-name="P97"><text:span text:style-name="T217">💎 유학쌍운과 청정환신이 이루는 최고의 업그레이드</text:span><text:span/></text:p>
      <text:p text:style-name="P98"><text:span text:style-name="T218">수행이 한층 더 높은 궤도에 오르면 '유학쌍운'이라는 깊은 단계에 이르게 되는데, 이때 비로소 청정환신이 성취돼. 온라인 게임에서 약간의 버그가 남아 있던 베타 버전의 아바타가, 마침내 결함이 전혀 없는 최고급 프리미엄 캐릭터로 완벽하게 업그레이드되는 것과 같다고 보면 돼. 이 청정환신 역시 거친 물질을 벗어난 바르도의 미세한 존재 방식을 그대로 따르고 있지만, 차이점은 완전히 정화된 순수한 빛의 몸이라는 점이지. 바르도라는 자연의 구조를 역이용해 가장 </text:span><text:span text:style-name="T219">고결한 깨달음의 몸을 빚어내는 위대한 변형이야.</text:span><text:span/></text:p>
      <text:p text:style-name="P99"><text:span text:style-name="T220">🧥 오래된 외투를 입고 세상 속으로 들어가는 탄생</text:span><text:span/></text:p>
      <text:p text:style-name="P100"><text:span text:style-name="T221">그렇다면 우리가 어머니의 태내를 통해 다시 세상에 나오는 '탄생'의 과정은 수행에서 어떻게 나타날까? 바로 앞 단계에서 성취한 청정하고 미세한 환신의 존재들이, 자신이 원래 가지고 있던 이전의 옛 몸(오온) 속으로 다시 사뿐히 걸어 들어가는 과정이 탄생의 단계와 일치해. 영웅이 자신의 정체를 숨기고 평범한 사람들 사이에 섞이기 위해 낡은 트렌치코트를 겉에 겹쳐 입는 것과 같지. 이 단계를 거쳐야만 수행자의 고차원적인 존재가 우리 같은 평범한 범부들의 거친</text:span><text:span text:style-name="T222"> 눈앞에도 일상적인 모습으로 나타날 수 있게 되는 거야.</text:span><text:span/></text:p>
      <text:p text:style-name="P101"><text:span text:style-name="T223">🎬 일상의 삶을 깨달음의 무대로 바꾸는 매칭 시스템</text:span><text:span/></text:p>
      <text:p text:style-name="P102"><text:span text:style-name="T224">이처럼 바르도와 탄생이라는 평범한 생사의 흐름을 부정환신과 청정환신이라는 고차원적 수행에 1:1로 정밀하게 매칭시키는 이유는 명확해. 우리가 매달리는 일상적이고 고통스러운 윤회의 사이클을 그대로 깨달음의 연장선으로 탈바꿈하기 위해서지. 오래되고 빛바랜 극장 스크린 위에 최고 화질의 최첨단 영상을 투사하여 무대 전체를 환상적으로 바꾸는 이치와 똑같아. 생사와 재탄생의 매 순간을 수행의 도구로 완벽하게 치환할 때, 우리는 비로소 평범한 삶의 현장 속에서 붓다</text:span><text:span text:style-name="T225">의 위대한 경지를 그대로 구현해 낼 수 있어.</text:span><text:span/></text:p>
      <text:p text:style-name="P103"><text:span text:style-name="T226">📝 핵심 요약</text:span><text:span/></text:p>
      <text:list text:style-name="WWNum4" text:continue-numbering="true">
        <text:list-item>
          <text:p text:style-name="P104"><text:span text:style-name="T227">바르도(중유)의 상태 내용과 일치하는 수행 단계는 3번째 차제의 부정환신과 유학쌍운의 청정환신이다.</text:span><text:span/></text:p>
        </text:list-item>
        <text:list-item>
          <text:p text:style-name="P105"><text:span text:style-name="T228">청정환신은 바르도의 미세한 구조를 지니고 있으나 번뇌가 완전히 정화된 깨달음의 몸이다.</text:span><text:span/></text:p>
        </text:list-item>
        <text:list-item>
          <text:p text:style-name="P106"><text:span text:style-name="T229">탄생의 과정과 일치하는 것은 이러한 환신들이 이전의 옛 몸(오온)에 머물며 범부의 눈에 나타나는 단계이다.</text:span><text:span/></text:p>
        </text:list-item>
        <text:list-item>
          <text:p text:style-name="P107"><text:span text:style-name="T230">생사의 흐름을 환신 수행에 정밀하게 매칭함으로써 평범한 윤회의 사이클을 깨달음의 과정으로 변형시킨다.</text:span><text:span/></text:p>
        </text:list-item>
      </text:list>
      <text:p text:style-name="P108"><text:span><text:soft-page-break/></text:span><text:span/><text:span/></text:p>
      <text:p text:style-name="P109"><text:span text:style-name="T231">[🟢 Online Mode | 26.06.05_16:08:25]</text:span><text:span/></text:p>
      <text:p text:style-name="P110"><text:span text:style-name="T232">161. 원만차제를 통한 삼세 정화의 근본 원리</text:span><text:span/></text:p>
      <text:p text:style-name="P111"><text:span text:style-name="T233">🔑 핵심 키워드: 원만차제, 탄생과 죽음, 바르도 정화, 실질적 변화</text:span><text:span/></text:p>
      <text:p text:style-name="P112"><text:span text:style-name="T234">🧼 생명의 악순환을 끊어내는 청소 프로세스</text:span><text:span/></text:p>
      <text:p text:style-name="P113"><text:span text:style-name="T235">우리가 제어할 수 없이 반복해 온 탄생과 죽음, 그리고 그 사이의 바르도라는 세 가지 과정은 원래 오염된 불순물로 가득 찬 순환 고리와 같아. 원만차제의 깊은 수행은 이 낡고 탁한 순환 고리를 통째로 수거해서 깨끗하게 세척하는 강력한 필터링 시스템 역할을 담당하지. 오랜 시간 먼지가 쌓여 제대로 작동하지 않던 기계를 완벽하게 분해해서 찌든 때를 벗겨내고 새 기름을 치는 정밀한 오버홀 작업이라고 생각하면 이해하기 쉬워.</text:span><text:span/></text:p>
      <text:p text:style-name="P114"><text:span text:style-name="T236">🍂 죽음의 순간을 지혜로 전환하는 기술</text:span><text:span/></text:p>
      <text:p text:style-name="P115"><text:span text:style-name="T237">수행자는 원만차제의 핵심 명상을 통해 거칠고 두려운 죽음의 에너지를 궁극의 지혜인 법신으로 완전히 뒤바꾸어 놓아. 평소에 아무런 준비 없이 맞이하던 죽음은 모든 기능이 파괴되는 재앙이지만, 이 고도의 기술을 적용하면 육체의 해체가 오히려 순수한 내면의 빛을 드러내는 최고의 기회가 되지. 쓸모없이 버려지던 고철들을 뜨거운 용광로에 넣어 녹인 뒤, 세상에서 가장 정밀하고 단단한 황금 부품으로 다시 제련해내는 고차원적인 공정과 똑같은 이치야.</text:span><text:span/></text:p>
      <text:p text:style-name="P116"><text:span text:style-name="T238">🌌 방황하는 바르도를 통제하는 의식의 내비게이션</text:span><text:span/></text:p>
      <text:p text:style-name="P117"><text:span text:style-name="T239">죽음 이후 다음 생을 받기 전까지 공간을 떠도는 바르도의 상태는 제어력을 잃고 거센 폭풍 속에 휩쓸리는 돛단배처럼 위태롭기 짝이 없어. 하지만 원만차제를 닦은 수행자의 미세한 풍심은 이 혼란스러운 중간 차원 속에서도 흔들리지 않는 명확한 방향 감각을 유지하게 돼. 짙은 안개가 자욱하게 깔려 앞이 전혀 보이지 않는 낯선 밤길에서도, 고성능 GPS 내비게이션의 안내를 받으며 목적지를 향해 안전하고 정확하게 차를 몰고 가는 것과 같지.</text:span><text:span/></text:p>
      <text:p text:style-name="P118"><text:span text:style-name="T240">👶 새로운 탄생을 깨달음으로 물들이는 연금술</text:span><text:span/></text:p>
      <text:p text:style-name="P119"><text:span text:style-name="T241">마지막으로 통제되지 않는 업력에 이끌려 무의식적으로 자궁에 들어가는 거친 탄생의 과정을, 자비롭고 신성한 화신의 나툼으로 완전히 승화시키는 단계야. 이전까지는 욕망과 분노에 눈이 멀어 어쩔 수 없이 새로운 육체의 감옥으로 걸어 들어갔다면, 이제는 깨달음의 본질을 간직한 채 중생을 구제하려는 거룩한 의도를 가지고 세상에 출현하는 거지. 흙탕물을 정수기에 통과시켜 마실 수 있는 청정한 생명수로 바꾸듯, 예속되어 있던 삶의 시작을 완벽한 자유의 영역으로 돌려놓</text:span><text:span text:style-name="T242">는 영적 연금술의 완성이라 볼 수 있어.</text:span><text:span/></text:p>
      <text:p text:style-name="P120"><text:span text:style-name="T243">📝 핵심 요약</text:span><text:span/></text:p>
      <text:list text:style-name="WWNum5" text:continue-numbering="true">
        <text:list-item>
          <text:p text:style-name="P121"><text:span text:style-name="T244">원만차제는 탄생, 죽음, 바르도라는 중생의 거친 순환을 근본적으로 세척하는 과정임.</text:span><text:span/></text:p>
        </text:list-item>
        <text:list-item>
          <text:p text:style-name="P122"><text:span text:style-name="T245">무력하게 당하던 죽음의 해체 현상을 용광로처럼 녹여 순수한 법신의 지혜로 제련함.</text:span><text:span/></text:p>
        </text:list-item>
        <text:list-item>
          <text:p text:style-name="P123"><text:span text:style-name="T246">안개 속의 GPS처럼 미세한 풍심을 통제하여 혼란스러운 바르도 공간을 안전하게 관통함.</text:span><text:span/></text:p>
        </text:list-item>
        <text:list-item>
          <text:p text:style-name="P124"><text:span text:style-name="T247">욕망에 이끌리던 거친 탄생을 중생 구제를 위한 화신의 신성한 출현으로 완전히 전환함.</text:span><text:span/></text:p>
        </text:list-item>
      </text:list>
      <text:p text:style-name="P125"><text:span><text:soft-page-break/></text:span><text:span/><text:span/></text:p>
      <text:p text:style-name="P126"><text:span text:style-name="T248">162. 원만차제의 죽음 정화와 법신으로의 변형</text:span><text:span/></text:p>
      <text:p text:style-name="P127"><text:span text:style-name="T249">🔑 핵심 키워드: 원만차제, 극도로 미세한 풍심, 삼매의 힘, 도위의 광명, 과위의 정광명 법신</text:span><text:span/></text:p>
      <text:p text:style-name="P128"><text:span text:style-name="T250">🚂 자동 주행하는 죽음의 열차</text:span><text:span/></text:p>
      <text:p text:style-name="P129"><text:span text:style-name="T251">우리가 맞이하는 평범한 죽음은 사실 거부할 수 없는 거대한 자동 주행 열차와 같아. 태어나서 삶의 흐름을 일관되게 이어가던 극도로 미세한 마음과 에너지는 죽음의 순간이 오면 자연스럽게 범속한 죽음의 정광명이라는 상태로 흘러가게 되지. 특별한 수행을 하지 않은 보통의 존재들은 이 흐름에 모든 제어권을 맡긴 채 아무런 의도 없이 그저 어둠과 빛의 터널을 통과하게 되는 거야.</text:span><text:span/></text:p>
      <text:p text:style-name="P130"><text:span text:style-name="T252">🛑 삼매라는 강력한 선로 전환기</text:span><text:span/></text:p>
      <text:p text:style-name="P131"><text:span text:style-name="T253">하지만 원만차제를 깊이 수행하는 유가행자는 이 자동 주행 코스를 그대로 내버려 두지 않아. 그들은 고도로 집중된 삼매의 힘을 발휘해서 거칠게 흘러가는 죽음의 자동 선로를 쾅 하고 차단해 버리지. 이것은 마치 폭주하는 열차의 제어실을 장악해서 완전히 새로운 방향으로 핸들을 꺾는 것과 같아. 범속하게 사라질 뻔한 마지막 에너지를 붙잡아 깨달음의 최고의 도구로 삼는 위대한 반전의 순간이지.</text:span><text:span/></text:p>
      <text:p text:style-name="P132"><text:span text:style-name="T254">💡 도위에서 밝히는 비유와 승의의 두 빛</text:span><text:span/></text:p>
      <text:p text:style-name="P133"><text:span text:style-name="T255">선로를 차단한 수행자는 그 미세한 풍심을 바탕으로 깨달음을 열어가는 단계인 도위의 상태로 진입해. 여기서는 비유의 광명과 승의의 광명이라는 두 가지 강력한 지혜의 전등을 켜게 되지. 비유의 광명은 진짜 깨달음의 빛을 만나기 전에 연습하는 모의 비행 같고, 승의의 광명은 마침내 우주의 참모습과 마주하는 실전 비행이야. 이 두 가지 빛을 통해 수행자는 죽음의 과정을 순수한 지혜의 에너지로 완벽하게 바꾸어 가기 시작해.</text:span><text:span/></text:p>
      <text:p text:style-name="P134"><text:span text:style-name="T256">☀️ 과위의 법신이라는 영원한 태양</text:span><text:span/></text:p>
      <text:p text:style-name="P135"><text:span text:style-name="T257">이 여정의 최종 종착지는 바로 구경의 지위인 과위의 정광명, 즉 법신의 자리야. 앞서 닦아온 지혜의 빛들이 하나로 모여 마침내 우주 그 자체가 되는 완벽한 붓다의 몸을 성취하는 것이지. 밤이 지나고 떠오른 영원한 태양처럼, 수행자는 범속한 죽음의 과정을 완전히 정화해서 영원히 꺼지지 않는 불멸의 깨달음으로 스스로를 변화시키는 데 성공하게 된단다.</text:span><text:span/></text:p>
      <text:p text:style-name="P136"><text:span text:style-name="T258">📝 핵심 요약</text:span><text:span/></text:p>
      <text:list text:style-name="WWNum6" text:continue-numbering="true">
        <text:list-item>
          <text:p text:style-name="P137"><text:span text:style-name="T259">원만차제 수행자는 범속한 죽음의 정광명으로 흘러가는 자동적인 과정을 삼매의 힘으로 차단한다.</text:span><text:span/></text:p>
        </text:list-item>
        <text:list-item>
          <text:p text:style-name="P138"><text:span text:style-name="T260">차단한 미세한 풍심을 깨달음의 단계인 도위의 비유의 광명과 승의의 광명으로 전환한다.</text:span><text:span/></text:p>
        </text:list-item>
        <text:list-item>
          <text:p text:style-name="P139"><text:span text:style-name="T261">최종 구경의 지위에서 죽음의 에너지를 완전한 깨달음의 몸인 과위의 정광명 법신으로 변화시킨다.</text:span><text:span/></text:p>
        </text:list-item>
        <text:list-item>
          <text:p text:style-name="P140"><text:span text:style-name="T262">이 위대한 반전의 과정을 통해 범속했던 죽음의 순간은 가장 순수한 정화의 도구로 거듭난다.</text:span><text:span/></text:p>
        </text:list-item>
      </text:list>
      <text:p text:style-name="P141"><text:span><text:soft-page-break/></text:span><text:span/><text:span/></text:p>
      <text:p text:style-name="P142"><text:span text:style-name="T263">[🔴 Offline Mode | 26.06.05_16:08:38]</text:span><text:span/></text:p>
      <text:p text:style-name="P143"><text:span text:style-name="T264">163. 삼매의 힘으로 이루는 바르도의 정화와 환신</text:span><text:span/></text:p>
      <text:p text:style-name="P144"><text:span text:style-name="T265">🔑 핵심 키워드: 원만차제, 지명풍, 삼매, 부정환신, 청정환신</text:span><text:span/></text:p>
      <text:p text:style-name="P145"><text:span text:style-name="T266">🌬️ 미세한 생명의 바람과 자연적인 바르도 형성</text:span><text:span/></text:p>
      <text:p text:style-name="P146"><text:span text:style-name="T267">우리가 죽음을 맞이할 때, 몸 안에는 평소와 전혀 다른 극도로 미세한 생명의 바람이 흐르게 돼. 이 미세한 바람은 자연스럽게 죽음의 정광명이라는 의식을 실어 나르는 탈것이 되어, 다음 생을 받기 전의 중간 단계인 바르도의 몸을 만들어내지. 이것은 마치 밤이 되면 아무런 의심 없이 정해진 철로를 따라 자동으로 움직이는 야간열차에 몸을 싣는 것과 아주 비슷해. 특별한 노력을 하지 않아도 과거의 업력과 자연의 법칙에 따라 의식이 바르도라는 새로운 환경의 신체로</text:span><text:span text:style-name="T268"> 자연스럽게 깨어나게 되는 일상적인 윤회의 흐름이란다.</text:span><text:span/></text:p>
      <text:p text:style-name="P147"><text:span text:style-name="T269">🛑 삼매의 힘을 통한 자연적 흐름의 차단</text:span><text:span/></text:p>
      <text:p text:style-name="P148"><text:span text:style-name="T270">하지만 깊은 명행을 닦은 원만차제의 유가행자는 이 자동적이고 무의식적인 흐름을 그대로 내버려 두지 않아. 행자는 고도의 집중력을 발휘하는 삼매의 힘을 사용하여, 미세한 바람이 자동으로 바르도의 몸을 형성하려는 그 결정적인 순간을 완전히 차단해 버리지.</text:span><text:span/></text:p>
      <text:p text:style-name="P149"><text:span text:style-name="T271">비유하자면, 정해진 목적지를 향해 질주하던 열차의 비상 브레이크를 강력하게 잡아당겨 멈춰 세운 뒤, 철로의 방향을 완전히 바꾸어 버리는 노련한 기관사의 모습과 같아. 스스로의 의지와 정신력으로 자연적인 업의 굴레를 통제하기 시작하는 놀라운 전환점이야.</text:span><text:span/></text:p>
      <text:p text:style-name="P150"><text:span text:style-name="T272">🎭 부정환신으로의 변형과 수행의 초기 단계</text:span><text:span/></text:p>
      <text:p text:style-name="P151"><text:span text:style-name="T273">그렇게 자연적인 바르도의 형성을 막아세운 유가행자는 그 미세한 생명의 바람을 바탕으로 전혀 새로운 존재 형태를 빚어내는데, 그것이 바로 부정환신이야. 비록 아직 완벽하게 정화되지는 않았지만, 이는 바르도의 형상과 완벽하게 일치하면서도 행자의 의식적인 통제 속에 있는 신비로운 가상의 몸이란다. 진흙으로 평범한 그릇을 만들려던 아까운 재료를 가로채어, 아직 완성작은 아니지만 아주 정교하고 아름다운 실험적 조각상을 임시로 빚어내는 예술가의 작업과 매우 닮아 있</text:span><text:span text:style-name="T274">어. 이 단계를 통해 행자는 배움이 남아있는 유학의 상태에서 의식을 정교하게 제어하는 훈련을 완성하게 돼.</text:span><text:span/></text:p>
      <text:p text:style-name="P152"><text:span text:style-name="T275">💎 유학·무학쌍운의 청정환신과 최종 정화</text:span><text:span/></text:p>
      <text:p text:style-name="P153"><text:span text:style-name="T276">최종 단계에 이르면 유가행자는 이 흐름을 더욱 발전시켜, 마음에 남아있던 마지막 미세한 오염물질까지 전부 거두어낸 청정환신을 성취하게 된단다.</text:span><text:span/></text:p>
      <text:list text:style-name="WWNum7" text:continue-numbering="true">
        <text:list-item>
          <text:p text:style-name="P154"><text:span text:style-name="T277">유학쌍운의 단계: 배움과 훈련이 지속되며 청정함을 더해가는 과정이야.</text:span><text:span/></text:p>
        </text:list-item>
        <text:list-item>
          <text:p text:style-name="P155"><text:span text:style-name="T278">무학쌍운의 단계: 마침내 더 이상 배울 것이 없는 완벽한 깨달음의 상태로 환신을 변화시켜.</text:span><text:span/></text:p>
        </text:list-item>
        <text:list-item>
          <text:p text:style-name="P156"><text:span text:style-name="T279">거친 실험용 조각상을 뜨거운 용광로에 넣어 불순물을 완벽하게 태워버린 뒤, 영원히 변치 않고 스스로 빛을 발하는 순금 부처상으로 완전히 재탄생시키는 것과 같은 이치지. 이로써 두렵고 혼란스러웠던 바르도의 영역은 완벽하게 정화되어, 생사의 굴레를 초월한 위대한 깨달음의 신체로 거듭나게 되는 거란다.</text:span><text:span/></text:p>
        </text:list-item>
      </text:list>
      <text:p text:style-name="P157"><text:span text:style-name="T280">📝 핵심 요약</text:span><text:span/></text:p>
      <text:list text:style-name="WWNum7" text:continue-numbering="true">
        <text:list-item>
          <text:p text:style-name="P158"><text:span text:style-name="T281">죽음의 순간에 미세한 생명의 바람이 자연스럽게 바르도의 몸을 형성하는 윤회의 흐름이 일어남.</text:span><text:span/></text:p>
        </text:list-item>
        <text:list-item>
          <text:p text:style-name="P159"><text:span text:style-name="T282">원만차제 수행자는 고도의 삼매력을 통해 이 자동적인 바르도 형성 과정을 강력하게 차단함.</text:span><text:span/></text:p>
        </text:list-item>
        <text:list-item>
          <text:p text:style-name="P160"><text:span text:style-name="T283">차단한 에너지를 의식적으로 통제하여 바르도 형상과 일치하는 임시적 유학의 부정환신으로 변형함.</text:span><text:span/></text:p>
        </text:list-item>
        <text:list-item>
          <text:p text:style-name="P161"><text:span text:style-name="T284">최종적으로 불순물을 모두 제거하여 완벽한 깨달음의 상태인 무학쌍운의 청정환신을 이루어 바르도를 정화함.</text:span><text:span/></text:p>
        </text:list-item>
      </text:list>
      <text:p text:style-name="P162"><text:span><text:soft-page-break/></text:span><text:span/><text:span/></text:p>
      <text:p text:style-name="P163"><text:span text:style-name="T285">[🟢 Online Mode | 26.06.05_16:08:44]</text:span><text:span/></text:p>
      <text:p text:style-name="P164"><text:span text:style-name="T286">164. 환신의 성취와 탄생의 근원적 정화</text:span><text:span/></text:p>
      <text:p text:style-name="P165"><text:span text:style-name="T287">🔑 핵심 키워드: 환신 성취, 바르도 타파, 옛 몸의 재진입, 탄생 정화</text:span><text:span/></text:p>
      <text:p text:style-name="P166"><text:span text:style-name="T288">🕊️ 환신의 완성과 중간 상태의 종말</text:span><text:span/></text:p>
      <text:p text:style-name="P167"><text:span text:style-name="T289">수행자가 명상을 통해 완벽한 환신을 얻게 되면, 죽음 이후에 방황해야 하는 중간 상태인 바르도가 근본적으로 사라지게 돼. 이것은 마치 정식 회원권을 결제해서 더 이상 지루한 대기실이나 임시 게스트 가상 공간에 머물 필요가 없어지는 것과 같아. 미지의 공간을 떠돌던 불안정한 에너지가 완벽하게 제어된 신성한 상태로 바뀌면서 영혼의 사후 방랑이 완전히 마감되는 순간이지.</text:span><text:span/></text:p>
      <text:p text:style-name="P168"><text:span text:style-name="T290">⛓️ 윤회의 쇠사슬과 자궁 구속의 타파</text:span><text:span/></text:p>
      <text:p text:style-name="P169"><text:span text:style-name="T291">환신의 강력한 힘은 과거의 업과 번뇌 때문에 강제적으로 자궁에 갇혀야 하는 무기력한 탄생의 고리를 완전히 끊어버려. 낡은 컴퓨터 프로그램이 오류를 일으켜서 원하지 않는 시스템으로 자동 재부팅되던 심각한 버그를 완벽하게 고친 셈이야. 더 이상 통제할 수 없는 카르마의 인력에 끌려가 이름도 모르는 모태 속에 갇히지 않고, 스스로의 힘으로 존재의 형태를 결정할 수 있는 절대적인 자유를 얻게 된단다.</text:span><text:span/></text:p>
      <text:p text:style-name="P170"><text:span text:style-name="T292">🔄 이전 육체로의 신비로운 의식 재진입</text:span><text:span/></text:p>
      <text:p text:style-name="P171"><text:span text:style-name="T293">바르도의 의식이 새로운 자궁을 찾아 들어가는 것과 겉보기에는 비슷하지만, 환신은 전혀 다른 선택을 해. 바로 자신이 쓰던 이전의 옛 몸으로 다시 당당하게 걸어 들어가는 거지. 고장 나서 멈췄던 빈티지 자동차를 완벽하게 튜닝한 베테랑 정비사가 다시 운전석에 앉아 시동을 거는 장면을 상상해봐. 낡은 육체의 무더기를 버리지 않고 영적인 목적을 위해 고도의 에너지를 불어넣어 재활용하는 신비로운 과정이야.</text:span><text:span/></text:p>
      <text:p text:style-name="P172"><text:span text:style-name="T294">📢 정법의 선설과 최상의 도를 향한 정진</text:span><text:span/></text:p>
      <text:p text:style-name="P173"><text:span text:style-name="T295">옛 몸에 다시 깃든 환신은 단순히 목숨을 연명하는 것이 아니라, 중생들에게 우주의 진리인 법을 널리 설하고 더 높은 영적 단계를 성취하기 위해 쉼 없이 나아가. 마치 고성능 확성기와 완벽한 지도를 손에 든 가이드가 미로 속에 갇힌 사람들을 구출하면서, 자신도 동시에 에베레스트 정상의 가장 높은 곳을 향해 성큼성큼 올라가는 모습과 같아. 존재의 이유가 오직 이타행과 완전한 깨달음으로 가득 차게 되는 장엄한 여정이지.</text:span><text:span/></text:p>
      <text:p text:style-name="P174"><text:span text:style-name="T296">💎 탄생을 정화하는 궁극의 원리</text:span><text:span/></text:p>
      <text:p text:style-name="P175"><text:span text:style-name="T297">이 모든 기적 같은 과정이 바로 밀교에서 말하는 탄생을 정화하는 진정한 방법이야. 아무런 통제권 없이 울며 태어나던 무지한 탄생의 과정을, 온전한 의식과 지혜를 품은 거룩한 사명으로 완전히 탈바꿈시키는 원리지. 흙탕물에 불과했던 존재의 시작을 가장 빛나는 다이아몬드의 탄생으로 바꾸는 심오한 가르침이라고 볼 수 있어.</text:span><text:span/></text:p>
      <text:p text:style-name="P176"><text:span text:style-name="T298">📝 핵심 요약</text:span><text:span/></text:p>
      <text:list text:style-name="WWNum8" text:continue-numbering="true">
        <text:list-item>
          <text:p text:style-name="P177"><text:span text:style-name="T299">수행자가 환신을 성취하면 죽음 이후 방황하는 임시 공간인 바르도가 근본적으로 파괴돼.</text:span><text:span/></text:p>
        </text:list-item>
        <text:list-item>
          <text:p text:style-name="P178"><text:span text:style-name="T300">과거의 카르마와 번뇌 때문에 자궁에 강제로 갇혀야 하는 무기력한 윤회의 탄생이 멈추게 돼.</text:span><text:span/></text:p>
        </text:list-item>
        <text:list-item>
          <text:p text:style-name="P179"><text:span text:style-name="T301">환신의 의식은 새로운 모태를 찾는 대신 자신이 사용하던 이전의 옛 육체로 신비롭게 다시 진입해.</text:span><text:span/></text:p>
        </text:list-item>
        <text:list-item>
          <text:p text:style-name="P180"><text:span text:style-name="T302">옛 몸에 머물며 진리를 설하고 더 높은 깨달음을 향해 정진함으로써 무지한 탄생의 과정을 거룩하게 정화해.</text:span><text:span/></text:p>
        </text:list-item>
      </text:list>
      <text:p text:style-name="P181"><text:span><text:soft-page-break/></text:span><text:span/><text:span/></text:p>
      <text:p text:style-name="P182"><text:span text:style-name="T303">[🟢 Online Mode | 26.06.05_16:08:50]</text:span><text:span/></text:p>
      <text:p text:style-name="P183"><text:span text:style-name="T304">165. 윤회의 고리를 끊는 궁극의 비유광명</text:span><text:span/></text:p>
      <text:p text:style-name="P184"><text:span text:style-name="T305">🔑 핵심 키워드: 탄생과 죽음의 파괴, 바르도 타파, 환신의 원인, 심적의 마지막, 비유광명</text:span><text:span/></text:p>
      <text:p text:style-name="P185"><text:span text:style-name="T306">🕸️ 삼사라의 순환을 멈추는 마법의 열쇠</text:span><text:span/></text:p>
      <text:p text:style-name="P186"><text:span text:style-name="T307">우리가 끊임없이 반복하는 탄생과 죽음, 그리고 그 사이를 떠돌아다니는 바르도라는 거대한 세 가지 순환의 고리를 실제적으로 완전히 파괴해 버리는 궁극의 비밀이 여기에 있어. 비유하자면 사방으로 복잡하게 얽혀서 밤새도록 돌아가는 거대한 놀이공원의 모든 기구들을 단 한 번에 멈추게 만드는 메인 전원 차단기를 찾아내어 내리는 것과 같지. 이 근본적인 에너지를 통제할 수 있게 되면, 우리는 마침내 영원히 굴러갈 것 같던 윤회의 바퀴에서 완전히 벗어날 수 있어.</text:span><text:span/></text:p>
      <text:p text:style-name="P187"><text:span text:style-name="T308">💎 환신을 창조하는 순수한 에너지의 원천</text:span><text:span/></text:p>
      <text:p text:style-name="P188"><text:span text:style-name="T309">이 단계에서 나타나는 비유광명은 깨달은 존재가 자유롭게 사용하는 신비로운 영적 신체인 환신을 만들어내는 가장 직접적인 재료가 돼.</text:span><text:span/></text:p>
      <text:p text:style-name="P189"><text:span text:style-name="T310">에너지의 인과 관계 구조</text:span><text:span/></text:p>
      <text:list text:style-name="WWNum9" text:continue-numbering="true">
        <text:list-item>
          <text:p text:style-name="P190"><text:span text:style-name="T311">원인 단계: 심적의 마지막 단계에서 실현되는 비유광명의 마음</text:span><text:span/></text:p>
        </text:list-item>
        <text:list-item>
          <text:p text:style-name="P191"><text:span text:style-name="T312">결과 단계: 공간과 물질의 제약을 받지 않는 완벽한 환신의 창조</text:span><text:span/></text:p>
        </text:list-item>
        <text:list-item>
          <text:p text:style-name="P192"><text:span text:style-name="T313">이것은 마치 최고 화질의 3D 홀로그램 프로젝터가 아주 순수하고 정밀한 레이저 빛을 뿜어내어 허공에 완벽한 입체 영상을 선명하게 직조해 내는 과정과 아주 똑같아. 원천이 되는 빛의 마음이 맑고 정교할수록, 그것을 바탕으로 피어나는 영적인 신체도 완벽한 힘을 갖추게 되는 거지.</text:span><text:span/></text:p>
        </text:list-item>
      </text:list>
      <text:p text:style-name="P193"><text:span text:style-name="T314">🌊 심적의 끝에서 만나는 비유광명</text:span><text:span/></text:p>
      <table:table table:style-name="ta2">
        <table:table-columns>
          <table:table-column table:style-name="co4"/>
          <table:table-column table:style-name="co5"/>
          <table:table-column table:style-name="co6"/>
        </table:table-columns>
        <table:table-row table:style-name="ro4" table:default-cell-style-name="ce11">
          <table:table-cell table:style-name="ce12">
            <text:p text:style-name="P194"><text:span text:style-name="T315">마음의 도정</text:span><text:span/></text:p>
          </table:table-cell>
          <table:table-cell table:style-name="ce13">
            <text:p text:style-name="P195"><text:span text:style-name="T316">도달하는 상태</text:span><text:span/></text:p>
          </table:table-cell>
          <table:table-cell table:style-name="ce14">
            <text:p text:style-name="P196"><text:span text:style-name="T317">직관적 비유</text:span><text:span/></text:p>
          </table:table-cell>
        </table:table-row>
        <table:table-row table:style-name="ro5" table:default-cell-style-name="ce11">
          <table:table-cell table:style-name="ce15">
            <text:p text:style-name="P197"><text:span text:style-name="T318">심적의 마지막 단계</text:span><text:span/></text:p>
          </table:table-cell>
          <table:table-cell table:style-name="ce16">
            <text:p text:style-name="P198"><text:span text:style-name="T319">거친 생각의 흐름이 완전히 멈춤</text:span><text:span/></text:p>
          </table:table-cell>
          <table:table-cell table:style-name="ce17">
            <text:p text:style-name="P199"><text:span text:style-name="T320">폭풍우가 지나간 뒤 물결 하나 없이 고요해진 호수</text:span><text:span/></text:p>
          </table:table-cell>
        </table:table-row>
        <table:table-row table:style-name="ro6" table:default-cell-style-name="ce11">
          <table:table-cell table:style-name="ce18">
            <text:p text:style-name="P200"><text:span text:style-name="T321">비유광명의 발현</text:span><text:span/></text:p>
          </table:table-cell>
          <table:table-cell table:style-name="ce19">
            <text:p text:style-name="P201"><text:span text:style-name="T322">궁극의 정광명에 도달하기 직전의 지혜</text:span><text:span/></text:p>
          </table:table-cell>
          <table:table-cell table:style-name="ce20">
            <text:p text:style-name="P202"><text:span text:style-name="T323">짙은 어둠을 뚫고 지평선 너머로 떠오르기 시작하는 새벽빛</text:span><text:span/></text:p>
          </table:table-cell>
        </table:table-row>
      </table:table>
      <text:p text:style-name="P203"><text:span text:style-name="T324">거친 감정과 분별심이 모두 가라앉은 심적의 가장 깊은 막바지에 이르면, 의식은 마침내 정광명과 아주 유사한 투명함을 가진 비유광명을 마주하게 돼. 세상의 온갖 소음과 잡음이 완벽하게 차단된 깊은 동굴 속에서 홀로 타오르는 깨끗한 촛불처럼, 오염되지 않은 마음 본연의 지혜가 조용히 빛을 발하는 상태야.</text:span><text:span/></text:p>
      <text:p text:style-name="P204"><text:span text:style-name="T325">⚡ 하나의 도미노로 무너지는 윤회의 사슬</text:span><text:span/></text:p>
      <text:p text:style-name="P205"><text:span text:style-name="T326">비유광명이 가진 가장 강력한 위력은 죽음이라는 거대한 그림자를 뿌리째 뽑아내어 파괴해 버린다는 점이야. 죽음이 실질적으로 소멸하게 되면, 그 뒤를 이어 일어나도록 프로그래밍되어 있던 바르도와 새로운 탄생 역시 아무런 힘을 쓰지 못하고 도미노처럼 자력으로 함께 무너져 내리게 되지. 비유하자면 촘촘하게 짜인 니트 스웨터의 가장 중심이 되는 올 하나를 잡고 힘차게 잡아당기면, 연결된 모든 실타래가 스스로 스르륵 풀려나와 옷의 형체가 완전히 사라지는 현상과 완벽</text:span><text:span text:style-name="T327">하게 일치해. 죽음이라는 첫 단추를 완전히 해체함으로써 사후와 환생의 사슬 전체를 단숨에 타파하는 강력한 연쇄 반응인 셈이야.</text:span><text:span/></text:p>
      <text:p text:style-name="P206"><text:span text:style-name="T328">📝 핵심 요약</text:span><text:span/></text:p>
      <text:list text:style-name="WWNum10" text:continue-numbering="true">
        <text:list-item>
          <text:p text:style-name="P207"><text:span text:style-name="T329">탄생, 죽음, 바르도라는 윤회의 세 단계를 근본적으로 타파하는 열쇠는 비유광명임.</text:span><text:span/></text:p>
        </text:list-item>
        <text:list-item>
          <text:p text:style-name="P208"><text:span text:style-name="T330">비유광명은 거친 마음이 사라진 심적의 마지막 단계이자 환신을 만드는 직접적 원인임.</text:span><text:span/></text:p>
        </text:list-item>
        <text:list-item>
          <text:p text:style-name="P209"><text:span text:style-name="T331">이 지혜의 빛은 정광명에 가까운 마음으로, 의식의 모든 오염이 정화된 상태를 뜻함.</text:span><text:span/></text:p>
        </text:list-item>
        <text:list-item>
          <text:p text:style-name="P210"><text:span text:style-name="T332">죽음의 에너지를 실제로 파괴함으로써 바르도와 다음 탄생까지 자력으로 연쇄 소멸시킴.</text:span><text:span/></text:p>
        </text:list-item>
      </text:list>
      <text:p text:style-name="P211"><text:span><text:soft-page-break/></text:span><text:span/><text:span/></text:p>
      <text:p text:style-name="P212"><text:span text:style-name="T333">166. 비유광명과 환신 성취를 통한 바르도의 소멸</text:span><text:span/></text:p>
      <text:p text:style-name="P213"><text:span text:style-name="T334">🔑 핵심 키워드: 비유광명, 환신 성취, 바르도 파괴, 미세한 생명의 바람, 영적 변형</text:span><text:span/></text:p>
      <text:p text:style-name="P214"><text:span text:style-name="T335">🕯️ 비유광명에서 피어나는 환신의 탄생</text:span><text:span/></text:p>
      <text:p text:style-name="P215"><text:span text:style-name="T336">수행자가 깊은 명상 속에서 비유광명이라는 높은 차원의 마음에 도달하면, 이를 바탕으로 환신이라는 신비로운 에너지의 몸을 완벽하게 성취하게 돼. 이것은 마치 뜨거운 용광로 속에서 순수한 금속 액체를 얻은 뒤, 그것을 정밀한 틀에 부어 단 한 치의 오차도 없는 완벽한 최첨단 로봇의 외형을 완성하는 것과 같지. 이 단단하고 영롱한 영적인 몸이 완성되는 순간, 수행자의 의식은 물질의 한계를 벗어나 완전히 새로운 차원으로 도약하게 된단다.</text:span><text:span/></text:p>
      <text:p text:style-name="P216"><text:span text:style-name="T337">🚧 바르도라는 중간 정거장의 근원적 파괴</text:span><text:span/></text:p>
      <text:p text:style-name="P217"><text:span text:style-name="T338">환신을 성취하는 순간, 우리가 앞서 배웠던 죽음과 다음 탄생 사이의 기묘한 대기실인 바르도는 영원히 닫히고 사라지게 돼. 불교에서는 이를 바르도를 근원적으로 파괴한다고 표현하지. 비유하자면 낡은 흙집을 허물고 그 자리에 절대로 무너지지 않는 거대한 다이아몬드 성을 지어 올리는 바람에, 예전의 위태롭고 임시방편적인 텐트 생활로 되돌아갈 수 있는 가능성 자체가 세상에서 완전히 소멸해 버리는 상태를 뜻해.</text:span><text:span/></text:p>
      <text:p text:style-name="P218"><text:span text:style-name="T339">🌀 생명의 바람이 맞이하는 위대한 변형</text:span><text:span/></text:p>
      <text:p text:style-name="P219"><text:span text:style-name="T340">이처럼 바르도가 영원히 차단되는 명확한 이유는 신체 내부의 가장 근본적인 에너지 법칙 변화에서 찾을 수 있어.</text:span><text:span/></text:p>
      <text:p text:style-name="P220"><text:span text:style-name="T341">에너지 전환의 핵심 구조:</text:span><text:span/></text:p>
      <text:list text:style-name="WWNum11" text:continue-numbering="true">
        <text:list-item>
          <text:p text:style-name="P221"><text:span text:style-name="T342">기존 상태: 극도로 미세한 생명의 바람이 통제되지 않아 바르도의 임시 몸을 형성함.</text:span><text:span/></text:p>
        </text:list-item>
        <text:list-item>
          <text:p text:style-name="P222"><text:span text:style-name="T343">변형된 상태: 그 미세한 바람이 수행의 힘으로 완벽하게 제어되어 오직 환신이라는 깨달음의 몸으로만 굳어짐.</text:span><text:span/></text:p>
        </text:list-item>
      </text:list>
      <text:p text:style-name="P223"><text:span text:style-name="T344">원래는 정처 없이 떠돌며 바르도의 거친 환영을 만들어내야 할 원재료가, 이제는 완벽한 작품의 뼈대로 영구 고정되어 다른 용도로 쓰일 수 없게 된 셈이지.</text:span><text:span/></text:p>
      <text:p text:style-name="P224"><text:span text:style-name="T345">💎 되돌아가지 않는 영원한 자유의 획득</text:span><text:span/></text:p>
      <text:p text:style-name="P225"><text:span text:style-name="T346">결국 생명의 바람이 환신으로 완전히 탈바꿈했다는 것은 생사의 소용돌이 속에서 길을 잃고 방황하던 윤회의 사슬이 완전히 끊어졌음을 의미해. 스마트폰의 임시 체험판 프리웨어 소프트웨어가 정식 영구 라이선스로 업그레이드되어 다시는 제한적인 데모 모드로 돌아가지 않는 것처럼 말이야. 미세한 에너지를 완전히 장악하여 환신을 이룬 수행자는 이제 더 이상 죽음 이후의 혼란스러운 바르도를 겪지 않고 오롯이 영원한 자유와 깨달음의 길로 직행하게 된단다.</text:span><text:span/></text:p>
      <text:p text:style-name="P226"><text:span text:style-name="T347">📝 핵심 요약</text:span><text:span/></text:p>
      <text:list text:style-name="WWNum11" text:continue-numbering="true">
        <text:list-item>
          <text:p text:style-name="P227"><text:span text:style-name="T348">수행자가 비유광명의 단계에서 환신을 성취하면 죽음 이후의 바르도 상태가 근원적으로 소멸한다.</text:span><text:span/></text:p>
        </text:list-item>
        <text:list-item>
          <text:p text:style-name="P228"><text:span text:style-name="T349">바르도가 사라지는 이유는 바르도의 임시 몸을 만들던 극도로 미세한 생명의 바람이 환신으로 완전히 변화했기 때문이다.</text:span><text:span/></text:p>
        </text:list-item>
        <text:list-item>
          <text:p text:style-name="P229"><text:span text:style-name="T350">이는 원재료가 영구적인 작품으로 고정되어 다시는 이전의 불완전한 상태로 돌아갈 수 없게 됨을 뜻한다.</text:span><text:span/></text:p>
        </text:list-item>
        <text:list-item>
          <text:p text:style-name="P230"><text:span text:style-name="T351">미세한 에너지의 완벽한 전환을 통해 윤회의 방황을 종결하고 영원한 영적 자유를 성취하는 최종 단계이다.</text:span><text:span/></text:p>
        </text:list-item>
      </text:list>
      <text:p text:style-name="P231"><text:span><text:soft-page-break/></text:span><text:span/><text:span/></text:p>
      <text:p text:style-name="P232"><text:span text:style-name="T352">[🟢 Online Mode | 26.06.05_16:10:00]</text:span><text:span/></text:p>
      <text:p text:style-name="P233"><text:span text:style-name="T353">167. 바르도의 타파와 즉신성불의 비밀</text:span><text:span/></text:p>
      <text:p text:style-name="P234"><text:span text:style-name="T354">🔑 핵심 키워드: 바르도 파괴, 업과 번뇌, 환신 성취, 당생성불</text:span><text:span/></text:p>
      <text:p text:style-name="P235"><text:span text:style-name="T355">🚪 우리가 끝없이 되풀이하는 생과 사의 미로 속에서 가장 결정적인 열쇠는 바로 바르도를 근원적으로 부수어버리는 일이야. 바르도는 앞선 생과 다음 생을 연결해 주는 중간 간이역 같은 곳인데, 이 간이역 자체를 완전히 철거해 버리면 의식은 더 이상 방황할 공간을 잃어버리게 되지. 마치 매일 아침 똑같은 알람이 울리며 잠에서 깨어나던 무한 루프 시스템에서 알람 장치의 메인 회로를 완전히 차단하여 악순환의 고리를 끊어내는 것과 같아.</text:span><text:span/></text:p>
      <text:p text:style-name="P236"><text:span text:style-name="T356">⛓️ 이처럼 중간 단계가 완전히 사라지면, 과거에 지었던 거친 행동의 결과물인 업과 마음을 어지럽히던 수많은 번뇌들이 더 이상 힘을 쓰지 못하게 돼. 의식이 다음 생의 무거운 육체를 입기 위해 필요했던 어두운 설계도들이 단숨에 불타 없어지기 때문이지. 빚쟁이에게 끊임없이 시달리던 사람이 장부를 완전히 파기하고 신용을 완벽하게 회복하여, 과거의 부채로부터 완벽하게 자유로워진 자유인이 되는 장면을 떠올려보면 이해하기 쉬울 거야.</text:span><text:span/></text:p>
      <text:p text:style-name="P237"><text:span text:style-name="T357">🌌 이렇게 거친 물질의 속박에서 벗어난 수행자의 의식은 마침내 가장 미세하고 순수한 에너지로 이루어진 신비로운 몸인 환신을 성취하게 돼. 환신은 우리가 흔히 아는 뼈와 살로 된 무거운 몸이 아니라, 오직 빛과 지혜로만 직조된 최첨단 홀로그램 수트와 같은 존재야. 낡고 삐걱거리던 중고차를 폐차하고, 우주 공간을 자유자재로 날아다닐 수 있는 완벽한 최신형 비행선으로 갈아타는 엄청난 진화가 내면에서 일어나는 거지.</text:span><text:span/></text:p>
      <text:p text:style-name="P238"><text:span text:style-name="T358">🎯 이 눈부신 환신을 이루어낸 존재는 머나먼 미래가 아니라 바로 지금 마주하고 있는 그 생 안에서 마침내 부처의 경지인 성불을 확정 짓게 돼. 여러 번 태어나고 죽는 번거로운 환승 과정을 모두 생략하고, 목적지까지 단번에 직항으로 날아가는 초고속 로켓을 탄 셈이니까. 이 위대한 반전의 원리를 명확히 이해하고 내면의 기운을 다스릴 때, 우리는 죽음의 공포를 넘어 단 한 생 만에 영원한 자유를 얻는 기적을 마주하게 되는 거야.</text:span><text:span/></text:p>
      <text:p text:style-name="P239"><text:span text:style-name="T359">📝 핵심 요약</text:span><text:span/></text:p>
      <text:list text:style-name="WWNum12" text:continue-numbering="true">
        <text:list-item>
          <text:p text:style-name="P240"><text:span text:style-name="T360">바르도를 근원적으로 파괴하면 의식이 윤회의 중간 고리에서 방황하는 현상이 차단된다.</text:span><text:span/></text:p>
        </text:list-item>
        <text:list-item>
          <text:p text:style-name="P241"><text:span text:style-name="T361">중간 단계의 소멸은 과거의 업과 번뇌가 새로운 태어남을 유도하지 못하도록 차단한다.</text:span><text:span/></text:p>
        </text:list-item>
        <text:list-item>
          <text:p text:style-name="P242"><text:span text:style-name="T362">거친 육신을 벗어난 의식은 미세한 에너지와 지혜로 이루어진 순수한 환신을 성취한다.</text:span><text:span/></text:p>
        </text:list-item>
        <text:list-item>
          <text:p text:style-name="P243"><text:span text:style-name="T363">환신을 이룬 수행자는 여러 생을 거치지 않고 오직 그 생 안에서 당당히 성불에 이른다.</text:span><text:span/></text:p>
        </text:list-item>
      </text:list>
      <text:p text:style-name="P244"><text:span><text:soft-page-break/></text:span><text:span/><text:span/></text:p>
      <text:p text:style-name="P245"><text:span text:style-name="T364">[🟢 Online Mode | 26.06.05_16:10:00]</text:span><text:span/></text:p>
      <text:p text:style-name="P246"><text:span text:style-name="T365">168. 방대한 기록의 과감한 생략과 위대한 스승들의 이정표</text:span><text:span/></text:p>
      <text:p text:style-name="P247"><text:span text:style-name="T366">🔑 핵심 키워드: 문헌의 생략, 방대함 방지, 쫑카빠 삼부자, 법맥 전승</text:span><text:span/></text:p>
      <text:p text:style-name="P248"><text:span text:style-name="T367">📚 불필요한 무게를 덜어낸 효율적인 지식 다이어트</text:span><text:span/></text:p>
      <text:p text:style-name="P249"><text:span text:style-name="T368">위에서 설명한 복잡하고 심오한 명상의 비밀들을 하나하나 증명하려면 사실 엄청나게 많은 역사적 문헌과 참고 자료들을 줄줄이 나열해야만 해. 하지만 그렇게 모든 주석을 빽빽하게 채워 넣다 보면 책의 두께가 끝없이 두꺼워지고 오히려 핵심을 파악하기가 더 힘들어지겠지. 이것은 마치 복잡한 가전제품을 새로 샀을 때 수백 페이지짜리 상세 기술 명세서 대신 실생활에서 바로 쓸 수 있는 핵심 요약 설명서만 깔끔하고 가볍게 제공하는 것과 같아.</text:span><text:span/></text:p>
      <text:p text:style-name="P250"><text:span text:style-name="T369">🧭 방황을 막아주는 가장 확실한 내비게이션</text:span><text:span/></text:p>
      <text:p text:style-name="P251"><text:span text:style-name="T370">저자는 글이 너무 복잡해지는 것을 막기 위해 자잘한 각주들을 과감하게 생략하는 대신, 우리가 길을 잃지 않도록 가장 신뢰할 수 있는 거대한 이정표를 세워두었어. 수많은 곁가지 정보에 파묻혀 헤매기보다는 중심을 잡아줄 최고의 정통 해설서를 찾아가도록 안내하는 방식이지. 목적지까지 가는 수많은 샛길을 일일이 설명하기보다 가장 빠르고 안전한 고속도로의 진입로를 정확하게 찍어주는 영적인 내비게이션 좌표라고 보면 돼.</text:span><text:span/></text:p>
      <text:p text:style-name="P252"><text:span text:style-name="T371">👑 영적 생태계의 거장인 쫑카빠 삼부자의 유산</text:span><text:span/></text:p>
      <text:p text:style-name="P253"><text:span text:style-name="T372">우리가 찾아가야 할 궁극의 나침반은 바로 쫑카빠와 그의 위대한 두 제자인 걜찹제와 캐둡제로 이어지는 성스러운 삼부자의 어록이야. 이들은 티베트 불교의 정수를 집대성하여 누구도 흔들 수 없는 단단한 이론적 토대를 완성한 거장들이지. 비유하자면 스마트폰의 핵심 운영체제를 최초로 개발한 천재 개발자와 그 시스템의 완성도를 최고조로 끌어올린 수석 연구원들이 남긴 공식 개발자 가이드북을 확인하라는 뜻과 같아.</text:span><text:span/></text:p>
      <text:p text:style-name="P254"><text:span text:style-name="T373">🌊 끊이지 않고 흐르는 정통 법맥의 깨달음</text:span><text:span/></text:p>
      <text:p text:style-name="P255"><text:span text:style-name="T374">삼부자의 가르침에서 끝나는 것이 아니라 그분들의 순수한 깨달음을 고스란히 이어받아 오늘날까지 전승해 온 수많은 선현들의 어록도 함께 살펴보는 것이 중요해. 스승에게서 제자로, 다시 그 제자로 맑은 물이 끊임없이 흘러내려 거대한 강을 이루는 법맥의 역사지. 올바른 계보를 가진 정통 전문가들의 임상 데이터와 해설을 교차 검증함으로써 우리는 오해나 왜곡 없이 밀교수행의 가장 깊은 정수에 도달할 수 있는 튼튼한 다리를 얻게 되는 셈이야.</text:span><text:span/></text:p>
      <text:p text:style-name="P256"><text:span text:style-name="T375">📝 핵심 요약</text:span><text:span/></text:p>
      <text:list text:style-name="WWNum13" text:continue-numbering="true">
        <text:list-item>
          <text:p text:style-name="P257"><text:span text:style-name="T376">문헌을 모두 나열하면 글이 지나치게 번다해지므로 과감하게 생략함.</text:span><text:span/></text:p>
        </text:list-item>
        <text:list-item>
          <text:p text:style-name="P258"><text:span text:style-name="T377">생략된 각주 대신 가장 권위 있는 쫑카빠 삼부자의 성스러운 어록을 이정표로 제시함.</text:span><text:span/></text:p>
        </text:list-item>
        <text:list-item>
          <text:p text:style-name="P259"><text:span text:style-name="T378">삼부자의 뒤를 이은 선현들의 전승 기록을 통해 명상의 깊은 내용을 자세히 파악할 수 있음.</text:span><text:span/></text:p>
        </text:list-item>
        <text:list-item>
          <text:p text:style-name="P260"><text:span text:style-name="T379">이는 복잡한 이론적 곁가지를 치고 가장 확실한 정통 고속도로를 안내하는 지혜임.</text:span><text:span/></text:p>
        </text:list-item>
      </text:list>
      <text:p text:style-name="P26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5.4pt" fo:margin-top="0pt"/>
      <style:text-properties fo:font-family="Arial" style:font-family-asian="Arial" style:font-family-complex="Arial" fo:font-size="11pt" style:font-size-complex="11pt" fo:language="en" style:language-complex="ar" fo:country="US" style:country-complex="SA"/>
    </style:default-style>
    <style:default-style style:family="text">
      <style:text-properties fo:font-family="Arial" style:font-family-asian="Arial" style:font-family-complex="Arial" fo:font-size="11pt" style:font-size-complex="11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4"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664"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664"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664"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664" style:display-name="Heading 5" style:family="paragraph" style:name="143">
      <style:paragraph-properties fo:margin-top="4pt" fo:margin-bottom="2pt"/>
      <style:text-properties fo:color="#0f4761" fo:font-family="Arial" style:font-family-asian="Arial" style:font-family-complex="Arial"/>
    </style:style>
    <style:style style:parent-style-name="664"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664" style:display-name="Heading 7" style:family="paragraph" style:name="145">
      <style:paragraph-properties fo:margin-top="2pt" fo:margin-bottom="0pt"/>
      <style:text-properties fo:color="#595959" fo:font-family="Arial" style:font-family-asian="Arial" style:font-family-complex="Arial"/>
    </style:style>
    <style:style style:parent-style-name="664" style:display-name="Heading 8" style:family="paragraph" style:name="146">
      <style:paragraph-properties fo:margin-bottom="0pt"/>
      <style:text-properties fo:color="#272727" fo:font-family="Arial" style:font-family-asian="Arial" style:font-family-complex="Arial" fo:font-style="italic"/>
    </style:style>
    <style:style style:parent-style-name="664"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fo:line-height="100%" fo:margin-top="0pt"/>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664"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664"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664"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48" style:display-name="Intense Emphasis" style:family="text" style:name="166">
      <style:paragraph-properties/>
      <style:text-properties fo:color="#0f4761" fo:font-style="italic"/>
    </style:style>
    <style:style style:parent-style-name="664"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664"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664"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664" style:display-name="Caption" style:family="paragraph" style:name="180">
      <style:paragraph-properties fo:line-height="100%" fo:margin-bottom="10pt"/>
      <style:text-properties fo:color="#0e2841" fo:font-size="9pt" style:font-size-complex="9pt" fo:font-style="italic"/>
    </style:style>
    <style:style style:parent-style-name="664"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664"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664" style:display-name="toc 1" style:family="paragraph" style:name="189">
      <style:paragraph-properties fo:margin-bottom="5pt"/>
    </style:style>
    <style:style style:parent-style-name="664" style:display-name="toc 2" style:family="paragraph" style:name="190">
      <style:paragraph-properties fo:margin-left="0.3881cm" fo:margin-bottom="5pt"/>
    </style:style>
    <style:style style:parent-style-name="664" style:display-name="toc 3" style:family="paragraph" style:name="191">
      <style:paragraph-properties fo:margin-left="0.7762cm" fo:margin-bottom="5pt"/>
    </style:style>
    <style:style style:parent-style-name="664" style:display-name="toc 4" style:family="paragraph" style:name="192">
      <style:paragraph-properties fo:margin-left="1.164cm" fo:margin-bottom="5pt"/>
    </style:style>
    <style:style style:parent-style-name="664" style:display-name="toc 5" style:family="paragraph" style:name="193">
      <style:paragraph-properties fo:margin-left="1.552cm" fo:margin-bottom="5pt"/>
    </style:style>
    <style:style style:parent-style-name="664" style:display-name="toc 6" style:family="paragraph" style:name="194">
      <style:paragraph-properties fo:margin-left="1.94cm" fo:margin-bottom="5pt"/>
    </style:style>
    <style:style style:parent-style-name="664" style:display-name="toc 7" style:family="paragraph" style:name="195">
      <style:paragraph-properties fo:margin-left="2.328cm" fo:margin-bottom="5pt"/>
    </style:style>
    <style:style style:parent-style-name="664" style:display-name="toc 8" style:family="paragraph" style:name="196">
      <style:paragraph-properties fo:margin-left="2.717cm" fo:margin-bottom="5pt"/>
    </style:style>
    <style:style style:parent-style-name="664"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664" style:display-name="table of figures" style:family="paragraph" style:name="209">
      <style:paragraph-properties fo:margin-bottom="0pt"/>
    </style:style>
    <style:style style:class="default" style:display-name="Normal" style:family="paragraph" style:name="664">
      <style:paragraph-properties fo:line-height="100%" fo:margin-top="0pt"/>
      <style:text-properties/>
    </style:style>
    <style:style style:parent-style-name="664" style:display-name="No Spacing" style:family="paragraph" style:name="667">
      <style:paragraph-properties fo:line-height="100%" fo:margin-bottom="0pt"/>
    </style:style>
    <style:style style:parent-style-name="664" style:display-name="List Paragraph" style:family="paragraph" style:name="668">
      <style:paragraph-properties fo:margin-left="1.27cm" style:contextual-spacing="true"/>
      <style:text-properties/>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74"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1.27cm" fo:margin-bottom="1.27cm" fo:margin-left="2.54cm" fo:margin-right="2.54cm"/>
    </style:page-layout>
    <style:page-layout style:name="Mpm2">
      <style:page-layout-properties fo:page-width="21.59cm" fo:page-height="27.94cm" style:print-orientation="portrait" fo:margin-top="1.27cm" fo:margin-bottom="1.27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4.0.129</meta:generator>
    <dc:creator/>
  </office:meta>
</office:document-meta>
</file>