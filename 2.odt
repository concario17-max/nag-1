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3">
      <style:paragraph-properties fo:line-height="115%" fo:margin-left="0cm" fo:margin-right="0cm" fo:text-indent="0cm" fo:margin-top="0pt" fo:margin-bottom="0pt" fo:border="none"/>
      <style:text-properties/>
    </style:style>
    <style:style style:family="text" style:name="T374">
      <style:text-properties fo:color="#1f1f1f" fo:font-family="Arial" style:font-family-asian="Arial" style:font-family-complex="Arial" fo:font-size="12pt"/>
    </style:style>
    <style:style style:parent-style-name="141" style:family="paragraph" style:name="P3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375">
      <style:text-properties fo:color="#1f1f1f" fo:font-family="Arial" style:font-family-asian="Arial" style:font-family-complex="Arial" fo:font-size="14pt" fo:font-weight="bold"/>
    </style:style>
    <style:style style:family="paragraph" style:name="P35">
      <style:paragraph-properties fo:line-height="115%" fo:margin-left="0cm" fo:margin-right="0cm" fo:text-indent="0cm" fo:margin-top="0pt" fo:margin-bottom="0pt" fo:border="none"/>
      <style:text-properties/>
    </style:style>
    <style:style style:family="text" style:name="T376">
      <style:text-properties fo:color="#1f1f1f" fo:font-family="Arial" style:font-family-asian="Arial" style:font-family-complex="Arial" fo:font-size="12pt"/>
    </style:style>
    <style:style style:parent-style-name="142" style:family="paragraph" style:name="P3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77">
      <style:text-properties fo:color="#1f1f1f" fo:font-family="Arial" style:font-family-asian="Arial" style:font-family-complex="Arial" fo:font-size="12pt" fo:font-weight="bold"/>
    </style:style>
    <style:style style:family="paragraph" style:name="P37">
      <style:paragraph-properties fo:line-height="115%" fo:margin-left="0cm" fo:margin-right="0cm" fo:text-indent="0cm" fo:margin-top="0pt" fo:margin-bottom="0pt" fo:border="none"/>
      <style:text-properties/>
    </style:style>
    <style:style style:family="text" style:name="T378">
      <style:text-properties fo:color="#1f1f1f" fo:font-family="Arial" style:font-family-asian="Arial" style:font-family-complex="Arial" fo:font-size="12pt"/>
    </style:style>
    <style:style style:parent-style-name="142" style:family="paragraph" style:name="P3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79">
      <style:text-properties fo:color="#1f1f1f" fo:font-family="Arial" style:font-family-asian="Arial" style:font-family-complex="Arial" fo:font-size="12pt" fo:font-weight="bold"/>
    </style:style>
    <style:style style:family="paragraph" style:name="P39">
      <style:paragraph-properties fo:line-height="115%" fo:margin-left="0cm" fo:margin-right="0cm" fo:text-indent="0cm" fo:margin-top="0pt" fo:margin-bottom="0pt" fo:border="none"/>
      <style:text-properties/>
    </style:style>
    <style:style style:family="text" style:name="T380">
      <style:text-properties fo:color="#1f1f1f" fo:font-family="Arial" style:font-family-asian="Arial" style:font-family-complex="Arial" fo:font-size="12pt"/>
    </style:style>
    <style:style style:parent-style-name="142" style:family="paragraph" style:name="P4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81">
      <style:text-properties fo:color="#1f1f1f" fo:font-family="Arial" style:font-family-asian="Arial" style:font-family-complex="Arial" fo:font-size="12pt" fo:font-weight="bold"/>
    </style:style>
    <style:style style:family="paragraph" style:name="P41">
      <style:paragraph-properties fo:line-height="115%" fo:margin-left="0cm" fo:margin-right="0cm" fo:text-indent="0cm" fo:margin-top="0pt" fo:margin-bottom="0pt" fo:border="none"/>
      <style:text-properties/>
    </style:style>
    <style:style style:family="text" style:name="T382">
      <style:text-properties fo:color="#1f1f1f" fo:font-family="Arial" style:font-family-asian="Arial" style:font-family-complex="Arial" fo:font-size="12pt"/>
    </style:style>
    <style:style style:parent-style-name="142" style:family="paragraph" style:name="P4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83">
      <style:text-properties fo:color="#1f1f1f" fo:font-family="Arial" style:font-family-asian="Arial" style:font-family-complex="Arial" fo:font-size="12pt" fo:font-weight="bold"/>
    </style:style>
    <style:style style:family="paragraph" style:name="P43">
      <style:paragraph-properties fo:line-height="115%" fo:margin-left="0cm" fo:margin-right="0cm" fo:text-indent="0cm" fo:margin-top="0pt" fo:margin-bottom="0pt" fo:border="none"/>
      <style:text-properties/>
    </style:style>
    <style:style style:family="text" style:name="T384">
      <style:text-properties fo:color="#1f1f1f" fo:font-family="Arial" style:font-family-asian="Arial" style:font-family-complex="Arial" fo:font-size="12pt"/>
    </style:style>
    <style:style style:parent-style-name="141" style:family="paragraph" style:name="P4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385">
      <style:text-properties fo:color="#1f1f1f" fo:font-family="Arial" style:font-family-asian="Arial" style:font-family-complex="Arial" fo:font-size="14pt" fo:font-weight="bold"/>
    </style:style>
    <style:style style:parent-style-name="668" style:list-style-name="WWNum1" style:family="paragraph" style:name="P45">
      <style:paragraph-properties fo:line-height="115%" fo:margin-right="0cm" fo:margin-top="0pt" fo:margin-bottom="0pt" fo:border="none"/>
      <style:text-properties/>
    </style:style>
    <style:style style:family="text" style:name="T386">
      <style:text-properties fo:color="#1f1f1f" fo:font-family="Arial" style:font-family-asian="Arial" style:font-family-complex="Arial" fo:font-size="12pt"/>
    </style:style>
    <style:style style:parent-style-name="668" style:list-style-name="WWNum1" style:family="paragraph" style:name="P46">
      <style:paragraph-properties fo:line-height="115%" fo:margin-right="0cm" fo:margin-top="0pt" fo:margin-bottom="0pt" fo:border="none"/>
      <style:text-properties/>
    </style:style>
    <style:style style:family="text" style:name="T387">
      <style:text-properties fo:color="#1f1f1f" fo:font-family="Arial" style:font-family-asian="Arial" style:font-family-complex="Arial" fo:font-size="12pt"/>
    </style:style>
    <style:style style:parent-style-name="668" style:list-style-name="WWNum1" style:family="paragraph" style:name="P47">
      <style:paragraph-properties fo:line-height="115%" fo:margin-right="0cm" fo:margin-top="0pt" fo:margin-bottom="0pt" fo:border="none"/>
      <style:text-properties/>
    </style:style>
    <style:style style:family="text" style:name="T388">
      <style:text-properties fo:color="#1f1f1f" fo:font-family="Arial" style:font-family-asian="Arial" style:font-family-complex="Arial" fo:font-size="12pt"/>
    </style:style>
    <style:style style:parent-style-name="668" style:list-style-name="WWNum1" style:family="paragraph" style:name="P48">
      <style:paragraph-properties fo:line-height="115%" fo:margin-right="0cm" fo:margin-top="0pt" fo:margin-bottom="0pt" fo:border="none"/>
      <style:text-properties fo:color="#1f1f1f" fo:font-family="Arial" style:font-family-asian="Arial" style:font-family-complex="Arial" fo:font-size="12pt" style:font-size-complex="12pt"/>
    </style:style>
    <style:style style:family="text" style:name="T389">
      <style:text-properties fo:color="#1f1f1f" fo:font-family="Arial" style:font-family-asian="Arial" style:font-family-complex="Arial" fo:font-size="12pt"/>
    </style:style>
    <style:style style:family="text" style:name="T390">
      <style:text-properties fo:font-family="Arial" style:font-family-asian="Arial" style:font-family-complex="Arial" fo:font-size="12pt"/>
    </style:style>
    <style:style style:family="paragraph" style:name="P49">
      <style:paragraph-properties/>
      <style:text-properties fo:font-family="Arial" style:font-family-asian="Arial" style:font-family-complex="Arial" fo:font-size="12pt" style:font-size-complex="12pt"/>
    </style:style>
    <style:style style:family="text" style:name="T391">
      <style:text-properties/>
    </style:style>
    <style:style style:family="text" style:name="T392">
      <style:text-properties/>
    </style:style>
    <style:style style:family="text" style:name="T393">
      <style:text-properties/>
    </style:style>
    <style:style style:parent-style-name="141" style:family="paragraph" style:name="P50">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394">
      <style:text-properties fo:color="#1f1f1f" fo:font-family="Arial" style:font-family-asian="Arial" style:font-family-complex="Arial" fo:font-size="14pt" fo:font-weight="bold"/>
    </style:style>
    <style:style style:family="paragraph" style:name="P51">
      <style:paragraph-properties fo:line-height="115%" fo:margin-left="0cm" fo:margin-right="0cm" fo:text-indent="0cm" fo:margin-top="0pt" fo:margin-bottom="0pt" fo:border="none"/>
      <style:text-properties/>
    </style:style>
    <style:style style:family="text" style:name="T395">
      <style:text-properties fo:color="#1f1f1f" fo:font-family="Arial" style:font-family-asian="Arial" style:font-family-complex="Arial" fo:font-size="12pt"/>
    </style:style>
    <style:style style:parent-style-name="142" style:family="paragraph" style:name="P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96">
      <style:text-properties fo:color="#1f1f1f" fo:font-family="Arial" style:font-family-asian="Arial" style:font-family-complex="Arial" fo:font-size="12pt" fo:font-weight="bold"/>
    </style:style>
    <style:style style:family="paragraph" style:name="P53">
      <style:paragraph-properties fo:line-height="115%" fo:margin-left="0cm" fo:margin-right="0cm" fo:text-indent="0cm" fo:margin-top="0pt" fo:margin-bottom="0pt" fo:border="none"/>
      <style:text-properties/>
    </style:style>
    <style:style style:family="text" style:name="T397">
      <style:text-properties fo:color="#1f1f1f" fo:font-family="Arial" style:font-family-asian="Arial" style:font-family-complex="Arial" fo:font-size="12pt"/>
    </style:style>
    <style:style style:family="text" style:name="T398">
      <style:text-properties fo:color="#1f1f1f" fo:font-family="Arial" style:font-family-asian="Arial" style:font-family-complex="Arial" fo:font-size="12pt"/>
    </style:style>
    <style:style style:parent-style-name="142" style:family="paragraph" style:name="P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99">
      <style:text-properties fo:color="#1f1f1f" fo:font-family="Arial" style:font-family-asian="Arial" style:font-family-complex="Arial" fo:font-size="12pt" fo:font-weight="bold"/>
    </style:style>
    <style:style style:family="paragraph" style:name="P55">
      <style:paragraph-properties fo:line-height="115%" fo:margin-left="0cm" fo:margin-right="0cm" fo:text-indent="0cm" fo:margin-top="0pt" fo:margin-bottom="0pt" fo:border="none"/>
      <style:text-properties/>
    </style:style>
    <style:style style:family="text" style:name="T400">
      <style:text-properties fo:color="#1f1f1f" fo:font-family="Arial" style:font-family-asian="Arial" style:font-family-complex="Arial" fo:font-size="12pt"/>
    </style:style>
    <style:style style:parent-style-name="142" style:family="paragraph" style:name="P5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01">
      <style:text-properties fo:color="#1f1f1f" fo:font-family="Arial" style:font-family-asian="Arial" style:font-family-complex="Arial" fo:font-size="12pt" fo:font-weight="bold"/>
    </style:style>
    <style:style style:family="paragraph" style:name="P57">
      <style:paragraph-properties fo:line-height="115%" fo:margin-left="0cm" fo:margin-right="0cm" fo:text-indent="0cm" fo:margin-top="0pt" fo:margin-bottom="0pt" fo:border="none"/>
      <style:text-properties/>
    </style:style>
    <style:style style:family="text" style:name="T402">
      <style:text-properties fo:color="#1f1f1f" fo:font-family="Arial" style:font-family-asian="Arial" style:font-family-complex="Arial" fo:font-size="12pt"/>
    </style:style>
    <style:style style:parent-style-name="142" style:family="paragraph" style:name="P5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03">
      <style:text-properties fo:color="#1f1f1f" fo:font-family="Arial" style:font-family-asian="Arial" style:font-family-complex="Arial" fo:font-size="12pt" fo:font-weight="bold"/>
    </style:style>
    <style:style style:family="paragraph" style:name="P59">
      <style:paragraph-properties fo:line-height="115%" fo:margin-left="0cm" fo:margin-right="0cm" fo:text-indent="0cm" fo:margin-top="0pt" fo:margin-bottom="0pt" fo:border="none"/>
      <style:text-properties/>
    </style:style>
    <style:style style:family="text" style:name="T404">
      <style:text-properties fo:color="#1f1f1f" fo:font-family="Arial" style:font-family-asian="Arial" style:font-family-complex="Arial" fo:font-size="12pt"/>
    </style:style>
    <style:style style:family="text" style:name="T405">
      <style:text-properties fo:color="#1f1f1f" fo:font-family="Arial" style:font-family-asian="Arial" style:font-family-complex="Arial" fo:font-size="12pt"/>
    </style:style>
    <style:style style:parent-style-name="141" style:family="paragraph" style:name="P6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406">
      <style:text-properties fo:color="#1f1f1f" fo:font-family="Arial" style:font-family-asian="Arial" style:font-family-complex="Arial" fo:font-size="14pt" fo:font-weight="bold"/>
    </style:style>
    <style:style style:parent-style-name="668" style:list-style-name="WWNum2" style:family="paragraph" style:name="P61">
      <style:paragraph-properties fo:line-height="115%" fo:margin-right="0cm" fo:margin-top="0pt" fo:margin-bottom="0pt" fo:border="none"/>
      <style:text-properties/>
    </style:style>
    <style:style style:family="text" style:name="T407">
      <style:text-properties fo:color="#1f1f1f" fo:font-family="Arial" style:font-family-asian="Arial" style:font-family-complex="Arial" fo:font-size="12pt"/>
    </style:style>
    <style:style style:parent-style-name="668" style:list-style-name="WWNum2" style:family="paragraph" style:name="P62">
      <style:paragraph-properties fo:line-height="115%" fo:margin-right="0cm" fo:margin-top="0pt" fo:margin-bottom="0pt" fo:border="none"/>
      <style:text-properties/>
    </style:style>
    <style:style style:family="text" style:name="T408">
      <style:text-properties fo:color="#1f1f1f" fo:font-family="Arial" style:font-family-asian="Arial" style:font-family-complex="Arial" fo:font-size="12pt"/>
    </style:style>
    <style:style style:parent-style-name="668" style:list-style-name="WWNum2" style:family="paragraph" style:name="P63">
      <style:paragraph-properties fo:line-height="115%" fo:margin-right="0cm" fo:margin-top="0pt" fo:margin-bottom="0pt" fo:border="none"/>
      <style:text-properties/>
    </style:style>
    <style:style style:family="text" style:name="T409">
      <style:text-properties fo:color="#1f1f1f" fo:font-family="Arial" style:font-family-asian="Arial" style:font-family-complex="Arial" fo:font-size="12pt"/>
    </style:style>
    <style:style style:parent-style-name="668" style:list-style-name="WWNum2" style:family="paragraph" style:name="P64">
      <style:paragraph-properties fo:line-height="115%" fo:margin-right="0cm" fo:margin-top="0pt" fo:margin-bottom="0pt" fo:border="none"/>
      <style:text-properties/>
    </style:style>
    <style:style style:family="text" style:name="T410">
      <style:text-properties fo:color="#1f1f1f" fo:font-family="Arial" style:font-family-asian="Arial" style:font-family-complex="Arial" fo:font-size="12pt"/>
    </style:style>
    <style:style style:family="paragraph" style:name="P65">
      <style:paragraph-properties/>
      <style:text-properties fo:font-family="Arial" style:font-family-asian="Arial" style:font-family-complex="Arial" fo:font-size="12pt" style:font-size-complex="12pt"/>
    </style:style>
    <style:style style:family="text" style:name="T411">
      <style:text-properties/>
    </style:style>
    <style:style style:family="text" style:name="T412">
      <style:text-properties/>
    </style:style>
    <style:style style:family="text" style:name="T413">
      <style:text-properties/>
    </style:style>
    <style:style style:family="paragraph" style:name="P66">
      <style:paragraph-properties fo:line-height="115%" fo:margin-left="0cm" fo:margin-right="0cm" fo:text-indent="0cm" fo:margin-top="0pt" fo:margin-bottom="0pt" fo:break-before="page" fo:border="none"/>
      <style:text-properties/>
    </style:style>
    <style:style style:family="text" style:name="T414">
      <style:text-properties fo:color="#1f1f1f" fo:font-family="Arial" style:font-family-asian="Arial" style:font-family-complex="Arial" fo:font-size="12pt"/>
    </style:style>
    <style:style style:parent-style-name="141" style:family="paragraph" style:name="P6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415">
      <style:text-properties fo:color="#1f1f1f" fo:font-family="Arial" style:font-family-asian="Arial" style:font-family-complex="Arial" fo:font-size="14pt" fo:font-weight="bold"/>
    </style:style>
    <style:style style:family="paragraph" style:name="P68">
      <style:paragraph-properties fo:line-height="115%" fo:margin-left="0cm" fo:margin-right="0cm" fo:text-indent="0cm" fo:margin-top="0pt" fo:margin-bottom="0pt" fo:border="none"/>
      <style:text-properties/>
    </style:style>
    <style:style style:family="text" style:name="T416">
      <style:text-properties fo:color="#1f1f1f" fo:font-family="Arial" style:font-family-asian="Arial" style:font-family-complex="Arial" fo:font-size="12pt"/>
    </style:style>
    <style:style style:parent-style-name="142" style:family="paragraph" style:name="P6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17">
      <style:text-properties fo:color="#1f1f1f" fo:font-family="Arial" style:font-family-asian="Arial" style:font-family-complex="Arial" fo:font-size="12pt" fo:font-weight="bold"/>
    </style:style>
    <style:style style:family="paragraph" style:name="P70">
      <style:paragraph-properties fo:line-height="115%" fo:margin-left="0cm" fo:margin-right="0cm" fo:text-indent="0cm" fo:margin-top="0pt" fo:margin-bottom="0pt" fo:border="none"/>
      <style:text-properties/>
    </style:style>
    <style:style style:family="text" style:name="T418">
      <style:text-properties fo:color="#1f1f1f" fo:font-family="Arial" style:font-family-asian="Arial" style:font-family-complex="Arial" fo:font-size="12pt"/>
    </style:style>
    <style:style style:parent-style-name="142" style:family="paragraph" style:name="P7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19">
      <style:text-properties fo:color="#1f1f1f" fo:font-family="Arial" style:font-family-asian="Arial" style:font-family-complex="Arial" fo:font-size="12pt" fo:font-weight="bold"/>
    </style:style>
    <style:style style:family="paragraph" style:name="P72">
      <style:paragraph-properties fo:line-height="115%" fo:margin-left="0cm" fo:margin-right="0cm" fo:text-indent="0cm" fo:margin-top="0pt" fo:margin-bottom="0pt" fo:border="none"/>
      <style:text-properties/>
    </style:style>
    <style:style style:family="text" style:name="T420">
      <style:text-properties fo:color="#1f1f1f" fo:font-family="Arial" style:font-family-asian="Arial" style:font-family-complex="Arial" fo:font-size="12pt"/>
    </style:style>
    <style:style style:family="text" style:name="T421">
      <style:text-properties fo:color="#1f1f1f" fo:font-family="Arial" style:font-family-asian="Arial" style:font-family-complex="Arial" fo:font-size="12pt"/>
    </style:style>
    <style:style style:parent-style-name="142" style:family="paragraph" style:name="P7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22">
      <style:text-properties fo:color="#1f1f1f" fo:font-family="Arial" style:font-family-asian="Arial" style:font-family-complex="Arial" fo:font-size="12pt" fo:font-weight="bold"/>
    </style:style>
    <style:style style:family="paragraph" style:name="P74">
      <style:paragraph-properties fo:line-height="115%" fo:margin-left="0cm" fo:margin-right="0cm" fo:text-indent="0cm" fo:margin-top="0pt" fo:margin-bottom="0pt" fo:border="none"/>
      <style:text-properties/>
    </style:style>
    <style:style style:family="text" style:name="T423">
      <style:text-properties fo:color="#1f1f1f" fo:font-family="Arial" style:font-family-asian="Arial" style:font-family-complex="Arial" fo:font-size="12pt"/>
    </style:style>
    <style:style style:family="text" style:name="T424">
      <style:text-properties fo:color="#1f1f1f" fo:font-family="Arial" style:font-family-asian="Arial" style:font-family-complex="Arial" fo:font-size="12pt"/>
    </style:style>
    <style:style style:parent-style-name="142" style:family="paragraph" style:name="P7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25">
      <style:text-properties fo:color="#1f1f1f" fo:font-family="Arial" style:font-family-asian="Arial" style:font-family-complex="Arial" fo:font-size="12pt" fo:font-weight="bold"/>
    </style:style>
    <style:style style:family="paragraph" style:name="P76">
      <style:paragraph-properties fo:line-height="115%" fo:margin-left="0cm" fo:margin-right="0cm" fo:text-indent="0cm" fo:margin-top="0pt" fo:margin-bottom="0pt" fo:border="none"/>
      <style:text-properties/>
    </style:style>
    <style:style style:family="text" style:name="T426">
      <style:text-properties fo:color="#1f1f1f" fo:font-family="Arial" style:font-family-asian="Arial" style:font-family-complex="Arial" fo:font-size="12pt"/>
    </style:style>
    <style:style style:parent-style-name="141" style:family="paragraph" style:name="P7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427">
      <style:text-properties fo:color="#1f1f1f" fo:font-family="Arial" style:font-family-asian="Arial" style:font-family-complex="Arial" fo:font-size="14pt" fo:font-weight="bold"/>
    </style:style>
    <style:style style:parent-style-name="668" style:list-style-name="WWNum3" style:family="paragraph" style:name="P78">
      <style:paragraph-properties fo:line-height="115%" fo:margin-right="0cm" fo:margin-top="0pt" fo:margin-bottom="0pt" fo:border="none"/>
      <style:text-properties/>
    </style:style>
    <style:style style:family="text" style:name="T428">
      <style:text-properties fo:color="#1f1f1f" fo:font-family="Arial" style:font-family-asian="Arial" style:font-family-complex="Arial" fo:font-size="12pt"/>
    </style:style>
    <style:style style:parent-style-name="668" style:list-style-name="WWNum3" style:family="paragraph" style:name="P79">
      <style:paragraph-properties fo:line-height="115%" fo:margin-right="0cm" fo:margin-top="0pt" fo:margin-bottom="0pt" fo:border="none"/>
      <style:text-properties/>
    </style:style>
    <style:style style:family="text" style:name="T429">
      <style:text-properties fo:color="#1f1f1f" fo:font-family="Arial" style:font-family-asian="Arial" style:font-family-complex="Arial" fo:font-size="12pt"/>
    </style:style>
    <style:style style:parent-style-name="668" style:list-style-name="WWNum3" style:family="paragraph" style:name="P80">
      <style:paragraph-properties fo:line-height="115%" fo:margin-right="0cm" fo:margin-top="0pt" fo:margin-bottom="0pt" fo:border="none"/>
      <style:text-properties/>
    </style:style>
    <style:style style:family="text" style:name="T430">
      <style:text-properties fo:color="#1f1f1f" fo:font-family="Arial" style:font-family-asian="Arial" style:font-family-complex="Arial" fo:font-size="12pt"/>
    </style:style>
    <style:style style:parent-style-name="668" style:list-style-name="WWNum3" style:family="paragraph" style:name="P81">
      <style:paragraph-properties fo:line-height="115%" fo:margin-right="0cm" fo:margin-top="0pt" fo:margin-bottom="0pt" fo:border="none"/>
      <style:text-properties/>
    </style:style>
    <style:style style:family="text" style:name="T431">
      <style:text-properties fo:color="#1f1f1f" fo:font-family="Arial" style:font-family-asian="Arial" style:font-family-complex="Arial" fo:font-size="12pt"/>
    </style:style>
    <style:style style:family="paragraph" style:name="P82">
      <style:paragraph-properties/>
      <style:text-properties fo:font-family="Arial" style:font-family-asian="Arial" style:font-family-complex="Arial" fo:font-size="12pt" style:font-size-complex="12pt"/>
    </style:style>
    <style:style style:family="text" style:name="T432">
      <style:text-properties/>
    </style:style>
    <style:style style:family="text" style:name="T433">
      <style:text-properties/>
    </style:style>
    <style:style style:family="text" style:name="T434">
      <style:text-properties/>
    </style:style>
    <style:style style:parent-style-name="141" style:family="paragraph" style:name="P8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435">
      <style:text-properties fo:color="#1f1f1f" fo:font-family="Arial" style:font-family-asian="Arial" style:font-family-complex="Arial" fo:font-size="14pt" fo:font-weight="bold"/>
    </style:style>
    <style:style style:family="paragraph" style:name="P84">
      <style:paragraph-properties fo:line-height="115%" fo:margin-left="0cm" fo:margin-right="0cm" fo:text-indent="0cm" fo:margin-top="0pt" fo:margin-bottom="0pt" fo:border="none"/>
      <style:text-properties/>
    </style:style>
    <style:style style:family="text" style:name="T436">
      <style:text-properties fo:color="#1f1f1f" fo:font-family="Arial" style:font-family-asian="Arial" style:font-family-complex="Arial" fo:font-size="12pt"/>
    </style:style>
    <style:style style:parent-style-name="142" style:family="paragraph" style:name="P8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37">
      <style:text-properties fo:color="#1f1f1f" fo:font-family="Arial" style:font-family-asian="Arial" style:font-family-complex="Arial" fo:font-size="12pt" fo:font-weight="bold"/>
    </style:style>
    <style:style style:family="paragraph" style:name="P86">
      <style:paragraph-properties fo:line-height="115%" fo:margin-left="0cm" fo:margin-right="0cm" fo:text-indent="0cm" fo:margin-top="0pt" fo:margin-bottom="0pt" fo:border="none"/>
      <style:text-properties/>
    </style:style>
    <style:style style:family="text" style:name="T438">
      <style:text-properties fo:color="#1f1f1f" fo:font-family="Arial" style:font-family-asian="Arial" style:font-family-complex="Arial" fo:font-size="12pt"/>
    </style:style>
    <style:style style:parent-style-name="142" style:family="paragraph" style:name="P8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39">
      <style:text-properties fo:color="#1f1f1f" fo:font-family="Arial" style:font-family-asian="Arial" style:font-family-complex="Arial" fo:font-size="12pt" fo:font-weight="bold"/>
    </style:style>
    <style:style style:family="paragraph" style:name="P88">
      <style:paragraph-properties fo:line-height="115%" fo:margin-left="0cm" fo:margin-right="0cm" fo:text-indent="0cm" fo:margin-top="0pt" fo:margin-bottom="0pt" fo:border="none"/>
      <style:text-properties/>
    </style:style>
    <style:style style:family="text" style:name="T440">
      <style:text-properties fo:color="#1f1f1f" fo:font-family="Arial" style:font-family-asian="Arial" style:font-family-complex="Arial" fo:font-size="12pt"/>
    </style:style>
    <style:style style:family="table" style:name="ta1">
      <style:paragraph-properties fo:line-height="100%" fo:margin-bottom="0pt"/>
      <style:table-properties style:width="6.966cm" fo:margin-left="0cm" table:align="left" style:use-optimal-column-width="true"/>
    </style:style>
    <style:style style:family="table-column" style:name="co1">
      <style:table-column-properties style:column-width="1.907cm" style:use-optimal-column-width="true"/>
    </style:style>
    <style:style style:family="table-column" style:name="co2">
      <style:table-column-properties style:column-width="5.059cm" style:use-optimal-column-width="true"/>
    </style:style>
    <style:style style:family="table-row" style:name="ro1">
      <style:table-row-properties/>
    </style:style>
    <style:style style:family="table-cell" style:name="ce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9">
      <style:paragraph-properties style:line-height-at-least="12pt" fo:margin-top="0pt" fo:margin-bottom="0pt"/>
      <style:text-properties/>
    </style:style>
    <style:style style:family="text" style:name="T441">
      <style:text-properties fo:color="#1f1f1f" fo:font-family="Arial" style:font-family-asian="Arial" style:font-family-complex="Arial" fo:font-size="12pt" fo:font-weight="bold"/>
    </style:style>
    <style:style style:family="table-cell" style:name="ce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0">
      <style:paragraph-properties style:line-height-at-least="12pt" fo:margin-top="0pt" fo:margin-bottom="0pt"/>
      <style:text-properties/>
    </style:style>
    <style:style style:family="text" style:name="T442">
      <style:text-properties fo:color="#1f1f1f" fo:font-family="Arial" style:font-family-asian="Arial" style:font-family-complex="Arial" fo:font-size="12pt" fo:font-weight="bold"/>
    </style:style>
    <style:style style:family="table-row" style:name="ro2">
      <style:table-row-properties/>
    </style:style>
    <style:style style:family="table-cell" style:name="ce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1">
      <style:paragraph-properties style:line-height-at-least="12pt" fo:margin-top="0pt" fo:margin-bottom="0pt"/>
      <style:text-properties/>
    </style:style>
    <style:style style:family="text" style:name="T443">
      <style:text-properties fo:color="#1f1f1f" fo:font-family="Arial" style:font-family-asian="Arial" style:font-family-complex="Arial" fo:font-size="12pt"/>
    </style:style>
    <style:style style:family="table-cell" style:name="ce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2">
      <style:paragraph-properties style:line-height-at-least="12pt" fo:margin-top="0pt" fo:margin-bottom="0pt"/>
      <style:text-properties/>
    </style:style>
    <style:style style:family="text" style:name="T444">
      <style:text-properties fo:color="#1f1f1f" fo:font-family="Arial" style:font-family-asian="Arial" style:font-family-complex="Arial" fo:font-size="12pt"/>
    </style:style>
    <style:style style:family="table-row" style:name="ro3">
      <style:table-row-properties/>
    </style:style>
    <style:style style:family="table-cell" style:name="ce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3">
      <style:paragraph-properties style:line-height-at-least="12pt" fo:margin-top="0pt" fo:margin-bottom="0pt"/>
      <style:text-properties/>
    </style:style>
    <style:style style:family="text" style:name="T445">
      <style:text-properties fo:color="#1f1f1f" fo:font-family="Arial" style:font-family-asian="Arial" style:font-family-complex="Arial" fo:font-size="12pt"/>
    </style:style>
    <style:style style:family="table-cell" style:name="ce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4">
      <style:paragraph-properties style:line-height-at-least="12pt" fo:margin-top="0pt" fo:margin-bottom="0pt"/>
      <style:text-properties/>
    </style:style>
    <style:style style:family="text" style:name="T446">
      <style:text-properties fo:color="#1f1f1f" fo:font-family="Arial" style:font-family-asian="Arial" style:font-family-complex="Arial" fo:font-size="12pt"/>
    </style:style>
    <style:style style:family="table-row" style:name="ro4">
      <style:table-row-properties/>
    </style:style>
    <style:style style:family="table-cell" style:name="ce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5">
      <style:paragraph-properties style:line-height-at-least="12pt" fo:margin-top="0pt" fo:margin-bottom="0pt"/>
      <style:text-properties/>
    </style:style>
    <style:style style:family="text" style:name="T447">
      <style:text-properties fo:color="#1f1f1f" fo:font-family="Arial" style:font-family-asian="Arial" style:font-family-complex="Arial" fo:font-size="12pt"/>
    </style:style>
    <style:style style:family="table-cell" style:name="ce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6">
      <style:paragraph-properties style:line-height-at-least="12pt" fo:margin-top="0pt" fo:margin-bottom="0pt"/>
      <style:text-properties/>
    </style:style>
    <style:style style:family="text" style:name="T448">
      <style:text-properties fo:color="#1f1f1f" fo:font-family="Arial" style:font-family-asian="Arial" style:font-family-complex="Arial" fo:font-size="12pt"/>
    </style:style>
    <style:style style:parent-style-name="142" style:family="paragraph" style:name="P9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49">
      <style:text-properties fo:color="#1f1f1f" fo:font-family="Arial" style:font-family-asian="Arial" style:font-family-complex="Arial" fo:font-size="12pt" fo:font-weight="bold"/>
    </style:style>
    <style:style style:family="paragraph" style:name="P98">
      <style:paragraph-properties fo:line-height="115%" fo:margin-left="0cm" fo:margin-right="0cm" fo:text-indent="0cm" fo:margin-top="0pt" fo:margin-bottom="0pt" fo:border="none"/>
      <style:text-properties/>
    </style:style>
    <style:style style:family="text" style:name="T450">
      <style:text-properties fo:color="#1f1f1f" fo:font-family="Arial" style:font-family-asian="Arial" style:font-family-complex="Arial" fo:font-size="12pt"/>
    </style:style>
    <style:style style:parent-style-name="142" style:family="paragraph" style:name="P9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51">
      <style:text-properties fo:color="#1f1f1f" fo:font-family="Arial" style:font-family-asian="Arial" style:font-family-complex="Arial" fo:font-size="12pt" fo:font-weight="bold"/>
    </style:style>
    <style:style style:family="paragraph" style:name="P100">
      <style:paragraph-properties fo:line-height="115%" fo:margin-left="0cm" fo:margin-right="0cm" fo:text-indent="0cm" fo:margin-top="0pt" fo:margin-bottom="0pt" fo:border="none"/>
      <style:text-properties/>
    </style:style>
    <style:style style:family="text" style:name="T452">
      <style:text-properties fo:color="#1f1f1f" fo:font-family="Arial" style:font-family-asian="Arial" style:font-family-complex="Arial" fo:font-size="12pt"/>
    </style:style>
    <style:style style:parent-style-name="668" style:list-style-name="WWNum4" style:family="paragraph" style:name="P101">
      <style:paragraph-properties fo:line-height="115%" fo:margin-right="0cm" fo:margin-top="0pt" fo:margin-bottom="0pt" fo:border="none"/>
      <style:text-properties/>
    </style:style>
    <style:style style:family="text" style:name="T453">
      <style:text-properties fo:color="#1f1f1f" fo:font-family="Arial" style:font-family-asian="Arial" style:font-family-complex="Arial" fo:font-size="12pt"/>
    </style:style>
    <style:style style:parent-style-name="668" style:list-style-name="WWNum4" style:family="paragraph" style:name="P102">
      <style:paragraph-properties fo:line-height="115%" fo:margin-right="0cm" fo:margin-top="0pt" fo:margin-bottom="0pt" fo:border="none"/>
      <style:text-properties/>
    </style:style>
    <style:style style:family="text" style:name="T454">
      <style:text-properties fo:color="#1f1f1f" fo:font-family="Arial" style:font-family-asian="Arial" style:font-family-complex="Arial" fo:font-size="12pt"/>
    </style:style>
    <style:style style:parent-style-name="141" style:family="paragraph" style:name="P10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455">
      <style:text-properties fo:color="#1f1f1f" fo:font-family="Arial" style:font-family-asian="Arial" style:font-family-complex="Arial" fo:font-size="14pt" fo:font-weight="bold"/>
    </style:style>
    <style:style style:parent-style-name="668" style:list-style-name="WWNum4" style:family="paragraph" style:name="P104">
      <style:paragraph-properties fo:line-height="115%" fo:margin-right="0cm" fo:margin-top="0pt" fo:margin-bottom="0pt" fo:border="none"/>
      <style:text-properties/>
    </style:style>
    <style:style style:family="text" style:name="T456">
      <style:text-properties fo:color="#1f1f1f" fo:font-family="Arial" style:font-family-asian="Arial" style:font-family-complex="Arial" fo:font-size="12pt"/>
    </style:style>
    <style:style style:parent-style-name="668" style:list-style-name="WWNum4" style:family="paragraph" style:name="P105">
      <style:paragraph-properties fo:line-height="115%" fo:margin-right="0cm" fo:margin-top="0pt" fo:margin-bottom="0pt" fo:border="none"/>
      <style:text-properties/>
    </style:style>
    <style:style style:family="text" style:name="T457">
      <style:text-properties fo:color="#1f1f1f" fo:font-family="Arial" style:font-family-asian="Arial" style:font-family-complex="Arial" fo:font-size="12pt"/>
    </style:style>
    <style:style style:parent-style-name="668" style:list-style-name="WWNum4" style:family="paragraph" style:name="P106">
      <style:paragraph-properties fo:line-height="115%" fo:margin-right="0cm" fo:margin-top="0pt" fo:margin-bottom="0pt" fo:border="none"/>
      <style:text-properties/>
    </style:style>
    <style:style style:family="text" style:name="T458">
      <style:text-properties fo:color="#1f1f1f" fo:font-family="Arial" style:font-family-asian="Arial" style:font-family-complex="Arial" fo:font-size="12pt"/>
    </style:style>
    <style:style style:parent-style-name="668" style:list-style-name="WWNum4" style:family="paragraph" style:name="P107">
      <style:paragraph-properties fo:line-height="115%" fo:margin-right="0cm" fo:margin-top="0pt" fo:margin-bottom="0pt" fo:border="none"/>
      <style:text-properties/>
    </style:style>
    <style:style style:family="text" style:name="T459">
      <style:text-properties fo:color="#1f1f1f" fo:font-family="Arial" style:font-family-asian="Arial" style:font-family-complex="Arial" fo:font-size="12pt"/>
    </style:style>
    <style:style style:family="paragraph" style:name="P108">
      <style:paragraph-properties/>
      <style:text-properties fo:font-family="Arial" style:font-family-asian="Arial" style:font-family-complex="Arial" fo:font-size="12pt" style:font-size-complex="12pt"/>
    </style:style>
    <style:style style:family="text" style:name="T460">
      <style:text-properties/>
    </style:style>
    <style:style style:family="text" style:name="T461">
      <style:text-properties/>
    </style:style>
    <style:style style:family="text" style:name="T462">
      <style:text-properties/>
    </style:style>
    <style:style style:family="paragraph" style:name="P109">
      <style:paragraph-properties fo:line-height="115%" fo:margin-left="0cm" fo:margin-right="0cm" fo:text-indent="0cm" fo:margin-top="0pt" fo:margin-bottom="0pt" fo:break-before="page" fo:border="none"/>
      <style:text-properties/>
    </style:style>
    <style:style style:family="text" style:name="T463">
      <style:text-properties fo:color="#1f1f1f" fo:font-family="Arial" style:font-family-asian="Arial" style:font-family-complex="Arial" fo:font-size="12pt"/>
    </style:style>
    <style:style style:parent-style-name="141" style:family="paragraph" style:name="P11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464">
      <style:text-properties fo:color="#1f1f1f" fo:font-family="Arial" style:font-family-asian="Arial" style:font-family-complex="Arial" fo:font-size="14pt" fo:font-weight="bold"/>
    </style:style>
    <style:style style:family="paragraph" style:name="P111">
      <style:paragraph-properties fo:line-height="115%" fo:margin-left="0cm" fo:margin-right="0cm" fo:text-indent="0cm" fo:margin-top="0pt" fo:margin-bottom="0pt" fo:border="none"/>
      <style:text-properties/>
    </style:style>
    <style:style style:family="text" style:name="T465">
      <style:text-properties fo:color="#1f1f1f" fo:font-family="Arial" style:font-family-asian="Arial" style:font-family-complex="Arial" fo:font-size="12pt"/>
    </style:style>
    <style:style style:parent-style-name="142" style:family="paragraph" style:name="P11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66">
      <style:text-properties fo:color="#1f1f1f" fo:font-family="Arial" style:font-family-asian="Arial" style:font-family-complex="Arial" fo:font-size="12pt" fo:font-weight="bold"/>
    </style:style>
    <style:style style:family="paragraph" style:name="P113">
      <style:paragraph-properties fo:line-height="115%" fo:margin-left="0cm" fo:margin-right="0cm" fo:text-indent="0cm" fo:margin-top="0pt" fo:margin-bottom="0pt" fo:border="none"/>
      <style:text-properties/>
    </style:style>
    <style:style style:family="text" style:name="T467">
      <style:text-properties fo:color="#1f1f1f" fo:font-family="Arial" style:font-family-asian="Arial" style:font-family-complex="Arial" fo:font-size="12pt"/>
    </style:style>
    <style:style style:family="paragraph" style:name="P114">
      <style:paragraph-properties fo:line-height="115%" fo:margin-left="0cm" fo:margin-right="0cm" fo:text-indent="0cm" fo:margin-top="0pt" fo:margin-bottom="0pt" fo:border="none"/>
      <style:text-properties/>
    </style:style>
    <style:style style:family="text" style:name="T468">
      <style:text-properties fo:color="#1f1f1f" fo:font-family="Arial" style:font-family-asian="Arial" style:font-family-complex="Arial" fo:font-size="12pt"/>
    </style:style>
    <style:style style:family="paragraph" style:name="P115">
      <style:paragraph-properties fo:line-height="115%" fo:margin-left="0cm" fo:margin-right="0cm" fo:text-indent="0cm" fo:margin-top="0pt" fo:margin-bottom="0pt" fo:border="none"/>
      <style:text-properties/>
    </style:style>
    <style:style style:family="text" style:name="T469">
      <style:text-properties fo:color="#1f1f1f" fo:font-family="Arial" style:font-family-asian="Arial" style:font-family-complex="Arial" fo:font-size="12pt"/>
    </style:style>
    <style:style style:parent-style-name="142" style:family="paragraph" style:name="P11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70">
      <style:text-properties fo:color="#1f1f1f" fo:font-family="Arial" style:font-family-asian="Arial" style:font-family-complex="Arial" fo:font-size="12pt" fo:font-weight="bold"/>
    </style:style>
    <style:style style:family="paragraph" style:name="P117">
      <style:paragraph-properties fo:line-height="115%" fo:margin-left="0cm" fo:margin-right="0cm" fo:text-indent="0cm" fo:margin-top="0pt" fo:margin-bottom="0pt" fo:border="none"/>
      <style:text-properties/>
    </style:style>
    <style:style style:family="text" style:name="T471">
      <style:text-properties fo:color="#1f1f1f" fo:font-family="Arial" style:font-family-asian="Arial" style:font-family-complex="Arial" fo:font-size="12pt"/>
    </style:style>
    <style:style style:family="table" style:name="ta2">
      <style:paragraph-properties fo:line-height="100%" fo:margin-bottom="0pt"/>
      <style:table-properties style:width="6.806cm" fo:margin-left="0cm" table:align="left" style:use-optimal-column-width="true"/>
    </style:style>
    <style:style style:family="table-column" style:name="co3">
      <style:table-column-properties style:column-width="1.48cm" style:use-optimal-column-width="true"/>
    </style:style>
    <style:style style:family="table-column" style:name="co4">
      <style:table-column-properties style:column-width="1.544cm" style:use-optimal-column-width="true"/>
    </style:style>
    <style:style style:family="table-column" style:name="co5">
      <style:table-column-properties style:column-width="3.782cm" style:use-optimal-column-width="true"/>
    </style:style>
    <style:style style:family="table-row" style:name="ro5">
      <style:table-row-properties/>
    </style:style>
    <style:style style:family="table-cell" style:name="ce1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8">
      <style:paragraph-properties style:line-height-at-least="12pt" fo:margin-top="0pt" fo:margin-bottom="0pt"/>
      <style:text-properties/>
    </style:style>
    <style:style style:family="text" style:name="T472">
      <style:text-properties fo:color="#1f1f1f" fo:font-family="Arial" style:font-family-asian="Arial" style:font-family-complex="Arial" fo:font-size="12pt" fo:font-weight="bold"/>
    </style:style>
    <style:style style:family="table-cell" style:name="ce1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9">
      <style:paragraph-properties style:line-height-at-least="12pt" fo:margin-top="0pt" fo:margin-bottom="0pt"/>
      <style:text-properties/>
    </style:style>
    <style:style style:family="text" style:name="T473">
      <style:text-properties fo:color="#1f1f1f" fo:font-family="Arial" style:font-family-asian="Arial" style:font-family-complex="Arial" fo:font-size="12pt" fo:font-weight="bold"/>
    </style:style>
    <style:style style:family="table-cell" style:name="ce1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0">
      <style:paragraph-properties style:line-height-at-least="12pt" fo:margin-top="0pt" fo:margin-bottom="0pt"/>
      <style:text-properties/>
    </style:style>
    <style:style style:family="text" style:name="T474">
      <style:text-properties fo:color="#1f1f1f" fo:font-family="Arial" style:font-family-asian="Arial" style:font-family-complex="Arial" fo:font-size="12pt" fo:font-weight="bold"/>
    </style:style>
    <style:style style:family="table-row" style:name="ro6">
      <style:table-row-properties/>
    </style:style>
    <style:style style:family="table-cell" style:name="ce1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1">
      <style:paragraph-properties style:line-height-at-least="12pt" fo:margin-top="0pt" fo:margin-bottom="0pt"/>
      <style:text-properties/>
    </style:style>
    <style:style style:family="text" style:name="T475">
      <style:text-properties fo:color="#1f1f1f" fo:font-family="Arial" style:font-family-asian="Arial" style:font-family-complex="Arial" fo:font-size="12pt"/>
    </style:style>
    <style:style style:family="table-cell" style:name="ce1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2">
      <style:paragraph-properties style:line-height-at-least="12pt" fo:margin-top="0pt" fo:margin-bottom="0pt"/>
      <style:text-properties/>
    </style:style>
    <style:style style:family="text" style:name="T476">
      <style:text-properties fo:color="#1f1f1f" fo:font-family="Arial" style:font-family-asian="Arial" style:font-family-complex="Arial" fo:font-size="12pt"/>
    </style:style>
    <style:style style:family="table-cell" style:name="ce1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3">
      <style:paragraph-properties style:line-height-at-least="12pt" fo:margin-top="0pt" fo:margin-bottom="0pt"/>
      <style:text-properties/>
    </style:style>
    <style:style style:family="text" style:name="T477">
      <style:text-properties fo:color="#1f1f1f" fo:font-family="Arial" style:font-family-asian="Arial" style:font-family-complex="Arial" fo:font-size="12pt"/>
    </style:style>
    <style:style style:family="table-row" style:name="ro7">
      <style:table-row-properties/>
    </style:style>
    <style:style style:family="table-cell" style:name="ce1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4">
      <style:paragraph-properties style:line-height-at-least="12pt" fo:margin-top="0pt" fo:margin-bottom="0pt"/>
      <style:text-properties/>
    </style:style>
    <style:style style:family="text" style:name="T478">
      <style:text-properties fo:color="#1f1f1f" fo:font-family="Arial" style:font-family-asian="Arial" style:font-family-complex="Arial" fo:font-size="12pt"/>
    </style:style>
    <style:style style:family="table-cell" style:name="ce1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5">
      <style:paragraph-properties style:line-height-at-least="12pt" fo:margin-top="0pt" fo:margin-bottom="0pt"/>
      <style:text-properties/>
    </style:style>
    <style:style style:family="text" style:name="T479">
      <style:text-properties fo:color="#1f1f1f" fo:font-family="Arial" style:font-family-asian="Arial" style:font-family-complex="Arial" fo:font-size="12pt"/>
    </style:style>
    <style:style style:family="table-cell" style:name="ce1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6">
      <style:paragraph-properties style:line-height-at-least="12pt" fo:margin-top="0pt" fo:margin-bottom="0pt"/>
      <style:text-properties/>
    </style:style>
    <style:style style:family="text" style:name="T480">
      <style:text-properties fo:color="#1f1f1f" fo:font-family="Arial" style:font-family-asian="Arial" style:font-family-complex="Arial" fo:font-size="12pt"/>
    </style:style>
    <style:style style:family="table-row" style:name="ro8">
      <style:table-row-properties/>
    </style:style>
    <style:style style:family="table-cell" style:name="ce2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7">
      <style:paragraph-properties style:line-height-at-least="12pt" fo:margin-top="0pt" fo:margin-bottom="0pt"/>
      <style:text-properties/>
    </style:style>
    <style:style style:family="text" style:name="T481">
      <style:text-properties fo:color="#1f1f1f" fo:font-family="Arial" style:font-family-asian="Arial" style:font-family-complex="Arial" fo:font-size="12pt"/>
    </style:style>
    <style:style style:family="table-cell" style:name="ce2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8">
      <style:paragraph-properties style:line-height-at-least="12pt" fo:margin-top="0pt" fo:margin-bottom="0pt"/>
      <style:text-properties/>
    </style:style>
    <style:style style:family="text" style:name="T482">
      <style:text-properties fo:color="#1f1f1f" fo:font-family="Arial" style:font-family-asian="Arial" style:font-family-complex="Arial" fo:font-size="12pt"/>
    </style:style>
    <style:style style:family="table-cell" style:name="ce2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9">
      <style:paragraph-properties style:line-height-at-least="12pt" fo:margin-top="0pt" fo:margin-bottom="0pt"/>
      <style:text-properties/>
    </style:style>
    <style:style style:family="text" style:name="T483">
      <style:text-properties fo:color="#1f1f1f" fo:font-family="Arial" style:font-family-asian="Arial" style:font-family-complex="Arial" fo:font-size="12pt"/>
    </style:style>
    <style:style style:parent-style-name="142" style:family="paragraph" style:name="P13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84">
      <style:text-properties fo:color="#1f1f1f" fo:font-family="Arial" style:font-family-asian="Arial" style:font-family-complex="Arial" fo:font-size="12pt" fo:font-weight="bold"/>
    </style:style>
    <style:style style:family="paragraph" style:name="P131">
      <style:paragraph-properties fo:line-height="115%" fo:margin-left="0cm" fo:margin-right="0cm" fo:text-indent="0cm" fo:margin-top="0pt" fo:margin-bottom="0pt" fo:border="none"/>
      <style:text-properties/>
    </style:style>
    <style:style style:family="text" style:name="T485">
      <style:text-properties fo:color="#1f1f1f" fo:font-family="Arial" style:font-family-asian="Arial" style:font-family-complex="Arial" fo:font-size="12pt"/>
    </style:style>
    <style:style style:parent-style-name="142" style:family="paragraph" style:name="P13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86">
      <style:text-properties fo:color="#1f1f1f" fo:font-family="Arial" style:font-family-asian="Arial" style:font-family-complex="Arial" fo:font-size="12pt" fo:font-weight="bold"/>
    </style:style>
    <style:style style:family="paragraph" style:name="P133">
      <style:paragraph-properties fo:line-height="115%" fo:margin-left="0cm" fo:margin-right="0cm" fo:text-indent="0cm" fo:margin-top="0pt" fo:margin-bottom="0pt" fo:border="none"/>
      <style:text-properties/>
    </style:style>
    <style:style style:family="text" style:name="T487">
      <style:text-properties fo:color="#1f1f1f" fo:font-family="Arial" style:font-family-asian="Arial" style:font-family-complex="Arial" fo:font-size="12pt"/>
    </style:style>
    <style:style style:parent-style-name="668" style:list-style-name="WWNum5" style:family="paragraph" style:name="P134">
      <style:paragraph-properties fo:line-height="115%" fo:margin-right="0cm" fo:margin-top="0pt" fo:margin-bottom="0pt" fo:border="none"/>
      <style:text-properties/>
    </style:style>
    <style:style style:family="text" style:name="T488">
      <style:text-properties fo:color="#1f1f1f" fo:font-family="Arial" style:font-family-asian="Arial" style:font-family-complex="Arial" fo:font-size="12pt"/>
    </style:style>
    <style:style style:parent-style-name="668" style:list-style-name="WWNum6" style:family="paragraph" style:name="P135">
      <style:paragraph-properties fo:line-height="115%" fo:margin-right="0cm" fo:margin-top="0pt" fo:margin-bottom="0pt" fo:border="none"/>
      <style:text-properties/>
    </style:style>
    <style:style style:family="text" style:name="T489">
      <style:text-properties fo:color="#1f1f1f" fo:font-family="Arial" style:font-family-asian="Arial" style:font-family-complex="Arial" fo:font-size="12pt"/>
    </style:style>
    <style:style style:parent-style-name="668" style:list-style-name="WWNum6" style:family="paragraph" style:name="P136">
      <style:paragraph-properties fo:line-height="115%" fo:margin-right="0cm" fo:margin-top="0pt" fo:margin-bottom="0pt" fo:border="none"/>
      <style:text-properties/>
    </style:style>
    <style:style style:family="text" style:name="T490">
      <style:text-properties fo:color="#1f1f1f" fo:font-family="Arial" style:font-family-asian="Arial" style:font-family-complex="Arial" fo:font-size="12pt"/>
    </style:style>
    <style:style style:parent-style-name="668" style:list-style-name="WWNum5" style:family="paragraph" style:name="P137">
      <style:paragraph-properties fo:line-height="115%" fo:margin-right="0cm" fo:margin-top="0pt" fo:margin-bottom="0pt" fo:border="none"/>
      <style:text-properties/>
    </style:style>
    <style:style style:family="text" style:name="T491">
      <style:text-properties fo:color="#1f1f1f" fo:font-family="Arial" style:font-family-asian="Arial" style:font-family-complex="Arial" fo:font-size="12pt"/>
    </style:style>
    <style:style style:parent-style-name="141" style:family="paragraph" style:name="P13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492">
      <style:text-properties fo:color="#1f1f1f" fo:font-family="Arial" style:font-family-asian="Arial" style:font-family-complex="Arial" fo:font-size="14pt" fo:font-weight="bold"/>
    </style:style>
    <style:style style:parent-style-name="668" style:list-style-name="WWNum5" style:family="paragraph" style:name="P139">
      <style:paragraph-properties fo:line-height="115%" fo:margin-right="0cm" fo:margin-top="0pt" fo:margin-bottom="0pt" fo:border="none"/>
      <style:text-properties/>
    </style:style>
    <style:style style:family="text" style:name="T493">
      <style:text-properties fo:color="#1f1f1f" fo:font-family="Arial" style:font-family-asian="Arial" style:font-family-complex="Arial" fo:font-size="12pt"/>
    </style:style>
    <style:style style:parent-style-name="668" style:list-style-name="WWNum5" style:family="paragraph" style:name="P140">
      <style:paragraph-properties fo:line-height="115%" fo:margin-right="0cm" fo:margin-top="0pt" fo:margin-bottom="0pt" fo:border="none"/>
      <style:text-properties/>
    </style:style>
    <style:style style:family="text" style:name="T494">
      <style:text-properties fo:color="#1f1f1f" fo:font-family="Arial" style:font-family-asian="Arial" style:font-family-complex="Arial" fo:font-size="12pt"/>
    </style:style>
    <style:style style:parent-style-name="668" style:list-style-name="WWNum5" style:family="paragraph" style:name="P141">
      <style:paragraph-properties fo:line-height="115%" fo:margin-right="0cm" fo:margin-top="0pt" fo:margin-bottom="0pt" fo:border="none"/>
      <style:text-properties/>
    </style:style>
    <style:style style:family="text" style:name="T495">
      <style:text-properties fo:color="#1f1f1f" fo:font-family="Arial" style:font-family-asian="Arial" style:font-family-complex="Arial" fo:font-size="12pt"/>
    </style:style>
    <style:style style:parent-style-name="668" style:list-style-name="WWNum5" style:family="paragraph" style:name="P142">
      <style:paragraph-properties fo:line-height="115%" fo:margin-right="0cm" fo:margin-top="0pt" fo:margin-bottom="0pt" fo:border="none"/>
      <style:text-properties/>
    </style:style>
    <style:style style:family="text" style:name="T496">
      <style:text-properties fo:color="#1f1f1f" fo:font-family="Arial" style:font-family-asian="Arial" style:font-family-complex="Arial" fo:font-size="12pt"/>
    </style:style>
    <style:style style:family="paragraph" style:name="P143">
      <style:paragraph-properties/>
      <style:text-properties fo:font-family="Arial" style:font-family-asian="Arial" style:font-family-complex="Arial" fo:font-size="12pt" style:font-size-complex="12pt"/>
    </style:style>
    <style:style style:family="text" style:name="T497">
      <style:text-properties/>
    </style:style>
    <style:style style:family="text" style:name="T498">
      <style:text-properties/>
    </style:style>
    <style:style style:family="text" style:name="T499">
      <style:text-properties/>
    </style:style>
    <style:style style:family="paragraph" style:name="P144">
      <style:paragraph-properties fo:line-height="115%" fo:margin-left="0cm" fo:margin-right="0cm" fo:text-indent="0cm" fo:margin-top="0pt" fo:margin-bottom="0pt" fo:break-before="page" fo:border="none"/>
      <style:text-properties/>
    </style:style>
    <style:style style:family="text" style:name="T500">
      <style:text-properties fo:color="#1f1f1f" fo:font-family="Arial" style:font-family-asian="Arial" style:font-family-complex="Arial" fo:font-size="12pt"/>
    </style:style>
    <style:style style:parent-style-name="141" style:family="paragraph" style:name="P14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01">
      <style:text-properties fo:color="#1f1f1f" fo:font-family="Arial" style:font-family-asian="Arial" style:font-family-complex="Arial" fo:font-size="14pt" fo:font-weight="bold"/>
    </style:style>
    <style:style style:family="paragraph" style:name="P146">
      <style:paragraph-properties fo:line-height="115%" fo:margin-left="0cm" fo:margin-right="0cm" fo:text-indent="0cm" fo:margin-top="0pt" fo:margin-bottom="0pt" fo:border="none"/>
      <style:text-properties/>
    </style:style>
    <style:style style:family="text" style:name="T502">
      <style:text-properties fo:color="#1f1f1f" fo:font-family="Arial" style:font-family-asian="Arial" style:font-family-complex="Arial" fo:font-size="12pt"/>
    </style:style>
    <style:style style:parent-style-name="142" style:family="paragraph" style:name="P14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03">
      <style:text-properties fo:color="#1f1f1f" fo:font-family="Arial" style:font-family-asian="Arial" style:font-family-complex="Arial" fo:font-size="12pt" fo:font-weight="bold"/>
    </style:style>
    <style:style style:family="paragraph" style:name="P148">
      <style:paragraph-properties fo:line-height="115%" fo:margin-left="0cm" fo:margin-right="0cm" fo:text-indent="0cm" fo:margin-top="0pt" fo:margin-bottom="0pt" fo:border="none"/>
      <style:text-properties/>
    </style:style>
    <style:style style:family="text" style:name="T504">
      <style:text-properties fo:color="#1f1f1f" fo:font-family="Arial" style:font-family-asian="Arial" style:font-family-complex="Arial" fo:font-size="12pt"/>
    </style:style>
    <style:style style:parent-style-name="142" style:family="paragraph" style:name="P14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05">
      <style:text-properties fo:color="#1f1f1f" fo:font-family="Arial" style:font-family-asian="Arial" style:font-family-complex="Arial" fo:font-size="12pt" fo:font-weight="bold"/>
    </style:style>
    <style:style style:family="paragraph" style:name="P150">
      <style:paragraph-properties fo:line-height="115%" fo:margin-left="0cm" fo:margin-right="0cm" fo:text-indent="0cm" fo:margin-top="0pt" fo:margin-bottom="0pt" fo:border="none"/>
      <style:text-properties/>
    </style:style>
    <style:style style:family="text" style:name="T506">
      <style:text-properties fo:color="#1f1f1f" fo:font-family="Arial" style:font-family-asian="Arial" style:font-family-complex="Arial" fo:font-size="12pt"/>
    </style:style>
    <style:style style:parent-style-name="142" style:family="paragraph" style:name="P15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07">
      <style:text-properties fo:color="#1f1f1f" fo:font-family="Arial" style:font-family-asian="Arial" style:font-family-complex="Arial" fo:font-size="12pt" fo:font-weight="bold"/>
    </style:style>
    <style:style style:family="paragraph" style:name="P152">
      <style:paragraph-properties fo:line-height="115%" fo:margin-left="0cm" fo:margin-right="0cm" fo:text-indent="0cm" fo:margin-top="0pt" fo:margin-bottom="0pt" fo:border="none"/>
      <style:text-properties/>
    </style:style>
    <style:style style:family="text" style:name="T508">
      <style:text-properties fo:color="#1f1f1f" fo:font-family="Arial" style:font-family-asian="Arial" style:font-family-complex="Arial" fo:font-size="12pt"/>
    </style:style>
    <style:style style:parent-style-name="142" style:family="paragraph" style:name="P15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09">
      <style:text-properties fo:color="#1f1f1f" fo:font-family="Arial" style:font-family-asian="Arial" style:font-family-complex="Arial" fo:font-size="12pt" fo:font-weight="bold"/>
    </style:style>
    <style:style style:family="paragraph" style:name="P154">
      <style:paragraph-properties fo:line-height="115%" fo:margin-left="0cm" fo:margin-right="0cm" fo:text-indent="0cm" fo:margin-top="0pt" fo:margin-bottom="0pt" fo:border="none"/>
      <style:text-properties/>
    </style:style>
    <style:style style:family="text" style:name="T510">
      <style:text-properties fo:color="#1f1f1f" fo:font-family="Arial" style:font-family-asian="Arial" style:font-family-complex="Arial" fo:font-size="12pt"/>
    </style:style>
    <style:style style:parent-style-name="141" style:family="paragraph" style:name="P15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11">
      <style:text-properties fo:color="#1f1f1f" fo:font-family="Arial" style:font-family-asian="Arial" style:font-family-complex="Arial" fo:font-size="14pt" fo:font-weight="bold"/>
    </style:style>
    <style:style style:parent-style-name="668" style:list-style-name="WWNum7" style:family="paragraph" style:name="P156">
      <style:paragraph-properties fo:line-height="115%" fo:margin-right="0cm" fo:margin-top="0pt" fo:margin-bottom="0pt" fo:border="none"/>
      <style:text-properties/>
    </style:style>
    <style:style style:family="text" style:name="T512">
      <style:text-properties fo:color="#1f1f1f" fo:font-family="Arial" style:font-family-asian="Arial" style:font-family-complex="Arial" fo:font-size="12pt"/>
    </style:style>
    <style:style style:parent-style-name="668" style:list-style-name="WWNum7" style:family="paragraph" style:name="P157">
      <style:paragraph-properties fo:line-height="115%" fo:margin-right="0cm" fo:margin-top="0pt" fo:margin-bottom="0pt" fo:border="none"/>
      <style:text-properties/>
    </style:style>
    <style:style style:family="text" style:name="T513">
      <style:text-properties fo:color="#1f1f1f" fo:font-family="Arial" style:font-family-asian="Arial" style:font-family-complex="Arial" fo:font-size="12pt"/>
    </style:style>
    <style:style style:parent-style-name="668" style:list-style-name="WWNum7" style:family="paragraph" style:name="P158">
      <style:paragraph-properties fo:line-height="115%" fo:margin-right="0cm" fo:margin-top="0pt" fo:margin-bottom="0pt" fo:border="none"/>
      <style:text-properties/>
    </style:style>
    <style:style style:family="text" style:name="T514">
      <style:text-properties fo:color="#1f1f1f" fo:font-family="Arial" style:font-family-asian="Arial" style:font-family-complex="Arial" fo:font-size="12pt"/>
    </style:style>
    <style:style style:parent-style-name="668" style:list-style-name="WWNum7" style:family="paragraph" style:name="P159">
      <style:paragraph-properties fo:line-height="115%" fo:margin-right="0cm" fo:margin-top="0pt" fo:margin-bottom="0pt" fo:border="none"/>
      <style:text-properties/>
    </style:style>
    <style:style style:family="text" style:name="T515">
      <style:text-properties fo:color="#1f1f1f" fo:font-family="Arial" style:font-family-asian="Arial" style:font-family-complex="Arial" fo:font-size="12pt"/>
    </style:style>
    <style:style style:family="paragraph" style:name="P160">
      <style:paragraph-properties/>
      <style:text-properties fo:font-family="Arial" style:font-family-asian="Arial" style:font-family-complex="Arial" fo:font-size="12pt" style:font-size-complex="12pt"/>
    </style:style>
    <style:style style:family="text" style:name="T516">
      <style:text-properties/>
    </style:style>
    <style:style style:family="text" style:name="T517">
      <style:text-properties/>
    </style:style>
    <style:style style:family="text" style:name="T518">
      <style:text-properties/>
    </style:style>
    <style:style style:family="paragraph" style:name="P161">
      <style:paragraph-properties fo:line-height="115%" fo:margin-left="0cm" fo:margin-right="0cm" fo:text-indent="0cm" fo:margin-top="0pt" fo:margin-bottom="0pt" fo:break-before="page" fo:border="none"/>
      <style:text-properties/>
    </style:style>
    <style:style style:family="text" style:name="T519">
      <style:text-properties fo:color="#1f1f1f" fo:font-family="Arial" style:font-family-asian="Arial" style:font-family-complex="Arial" fo:font-size="12pt"/>
    </style:style>
    <style:style style:parent-style-name="141" style:family="paragraph" style:name="P16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20">
      <style:text-properties fo:color="#1f1f1f" fo:font-family="Arial" style:font-family-asian="Arial" style:font-family-complex="Arial" fo:font-size="14pt" fo:font-weight="bold"/>
    </style:style>
    <style:style style:family="paragraph" style:name="P163">
      <style:paragraph-properties fo:line-height="115%" fo:margin-left="0cm" fo:margin-right="0cm" fo:text-indent="0cm" fo:margin-top="0pt" fo:margin-bottom="0pt" fo:border="none"/>
      <style:text-properties/>
    </style:style>
    <style:style style:family="text" style:name="T521">
      <style:text-properties fo:color="#1f1f1f" fo:font-family="Arial" style:font-family-asian="Arial" style:font-family-complex="Arial" fo:font-size="12pt"/>
    </style:style>
    <style:style style:parent-style-name="142" style:family="paragraph" style:name="P16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22">
      <style:text-properties fo:color="#1f1f1f" fo:font-family="Arial" style:font-family-asian="Arial" style:font-family-complex="Arial" fo:font-size="12pt" fo:font-weight="bold"/>
    </style:style>
    <style:style style:family="paragraph" style:name="P165">
      <style:paragraph-properties fo:line-height="115%" fo:margin-left="0cm" fo:margin-right="0cm" fo:text-indent="0cm" fo:margin-top="0pt" fo:margin-bottom="0pt" fo:border="none"/>
      <style:text-properties/>
    </style:style>
    <style:style style:family="text" style:name="T523">
      <style:text-properties fo:color="#1f1f1f" fo:font-family="Arial" style:font-family-asian="Arial" style:font-family-complex="Arial" fo:font-size="12pt"/>
    </style:style>
    <style:style style:parent-style-name="142" style:family="paragraph" style:name="P16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24">
      <style:text-properties fo:color="#1f1f1f" fo:font-family="Arial" style:font-family-asian="Arial" style:font-family-complex="Arial" fo:font-size="12pt" fo:font-weight="bold"/>
    </style:style>
    <style:style style:family="paragraph" style:name="P167">
      <style:paragraph-properties fo:line-height="115%" fo:margin-left="0cm" fo:margin-right="0cm" fo:text-indent="0cm" fo:margin-top="0pt" fo:margin-bottom="0pt" fo:border="none"/>
      <style:text-properties/>
    </style:style>
    <style:style style:family="text" style:name="T525">
      <style:text-properties fo:color="#1f1f1f" fo:font-family="Arial" style:font-family-asian="Arial" style:font-family-complex="Arial" fo:font-size="12pt"/>
    </style:style>
    <style:style style:parent-style-name="142" style:family="paragraph" style:name="P16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26">
      <style:text-properties fo:color="#1f1f1f" fo:font-family="Arial" style:font-family-asian="Arial" style:font-family-complex="Arial" fo:font-size="12pt" fo:font-weight="bold"/>
    </style:style>
    <style:style style:family="paragraph" style:name="P169">
      <style:paragraph-properties fo:line-height="115%" fo:margin-left="0cm" fo:margin-right="0cm" fo:text-indent="0cm" fo:margin-top="0pt" fo:margin-bottom="0pt" fo:border="none"/>
      <style:text-properties/>
    </style:style>
    <style:style style:family="text" style:name="T527">
      <style:text-properties fo:color="#1f1f1f" fo:font-family="Arial" style:font-family-asian="Arial" style:font-family-complex="Arial" fo:font-size="12pt"/>
    </style:style>
    <style:style style:parent-style-name="141" style:family="paragraph" style:name="P17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28">
      <style:text-properties fo:color="#1f1f1f" fo:font-family="Arial" style:font-family-asian="Arial" style:font-family-complex="Arial" fo:font-size="14pt" fo:font-weight="bold"/>
    </style:style>
    <style:style style:parent-style-name="668" style:list-style-name="WWNum8" style:family="paragraph" style:name="P171">
      <style:paragraph-properties fo:line-height="115%" fo:margin-right="0cm" fo:margin-top="0pt" fo:margin-bottom="0pt" fo:border="none"/>
      <style:text-properties/>
    </style:style>
    <style:style style:family="text" style:name="T529">
      <style:text-properties fo:color="#1f1f1f" fo:font-family="Arial" style:font-family-asian="Arial" style:font-family-complex="Arial" fo:font-size="12pt"/>
    </style:style>
    <style:style style:parent-style-name="668" style:list-style-name="WWNum8" style:family="paragraph" style:name="P172">
      <style:paragraph-properties fo:line-height="115%" fo:margin-right="0cm" fo:margin-top="0pt" fo:margin-bottom="0pt" fo:border="none"/>
      <style:text-properties/>
    </style:style>
    <style:style style:family="text" style:name="T530">
      <style:text-properties fo:color="#1f1f1f" fo:font-family="Arial" style:font-family-asian="Arial" style:font-family-complex="Arial" fo:font-size="12pt"/>
    </style:style>
    <style:style style:parent-style-name="668" style:list-style-name="WWNum8" style:family="paragraph" style:name="P173">
      <style:paragraph-properties fo:line-height="115%" fo:margin-right="0cm" fo:margin-top="0pt" fo:margin-bottom="0pt" fo:border="none"/>
      <style:text-properties/>
    </style:style>
    <style:style style:family="text" style:name="T531">
      <style:text-properties fo:color="#1f1f1f" fo:font-family="Arial" style:font-family-asian="Arial" style:font-family-complex="Arial" fo:font-size="12pt"/>
    </style:style>
    <style:style style:parent-style-name="668" style:list-style-name="WWNum8" style:family="paragraph" style:name="P174">
      <style:paragraph-properties fo:line-height="115%" fo:margin-right="0cm" fo:margin-top="0pt" fo:margin-bottom="0pt" fo:border="none"/>
      <style:text-properties/>
    </style:style>
    <style:style style:family="text" style:name="T532">
      <style:text-properties fo:color="#1f1f1f" fo:font-family="Arial" style:font-family-asian="Arial" style:font-family-complex="Arial" fo:font-size="12pt"/>
    </style:style>
    <style:style style:family="paragraph" style:name="P175">
      <style:paragraph-properties/>
      <style:text-properties fo:font-family="Arial" style:font-family-asian="Arial" style:font-family-complex="Arial" fo:font-size="12pt" style:font-size-complex="12pt"/>
    </style:style>
    <style:style style:family="text" style:name="T533">
      <style:text-properties/>
    </style:style>
    <style:style style:family="text" style:name="T534">
      <style:text-properties/>
    </style:style>
    <style:style style:family="text" style:name="T535">
      <style:text-properties/>
    </style:style>
    <style:style style:family="paragraph" style:name="P176">
      <style:paragraph-properties fo:line-height="115%" fo:margin-left="0cm" fo:margin-right="0cm" fo:text-indent="0cm" fo:margin-top="0pt" fo:margin-bottom="0pt" fo:break-before="page" fo:border="none"/>
      <style:text-properties/>
    </style:style>
    <style:style style:family="text" style:name="T536">
      <style:text-properties fo:color="#1f1f1f" fo:font-family="Arial" style:font-family-asian="Arial" style:font-family-complex="Arial" fo:font-size="12pt"/>
    </style:style>
    <style:style style:parent-style-name="141" style:family="paragraph" style:name="P17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37">
      <style:text-properties fo:color="#1f1f1f" fo:font-family="Arial" style:font-family-asian="Arial" style:font-family-complex="Arial" fo:font-size="14pt" fo:font-weight="bold"/>
    </style:style>
    <style:style style:family="paragraph" style:name="P178">
      <style:paragraph-properties fo:line-height="115%" fo:margin-left="0cm" fo:margin-right="0cm" fo:text-indent="0cm" fo:margin-top="0pt" fo:margin-bottom="0pt" fo:border="none"/>
      <style:text-properties/>
    </style:style>
    <style:style style:family="text" style:name="T538">
      <style:text-properties fo:color="#1f1f1f" fo:font-family="Arial" style:font-family-asian="Arial" style:font-family-complex="Arial" fo:font-size="12pt"/>
    </style:style>
    <style:style style:parent-style-name="142" style:family="paragraph" style:name="P17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39">
      <style:text-properties fo:color="#1f1f1f" fo:font-family="Arial" style:font-family-asian="Arial" style:font-family-complex="Arial" fo:font-size="12pt" fo:font-weight="bold"/>
    </style:style>
    <style:style style:family="paragraph" style:name="P180">
      <style:paragraph-properties fo:line-height="115%" fo:margin-left="0cm" fo:margin-right="0cm" fo:text-indent="0cm" fo:margin-top="0pt" fo:margin-bottom="0pt" fo:border="none"/>
      <style:text-properties/>
    </style:style>
    <style:style style:family="text" style:name="T540">
      <style:text-properties fo:color="#1f1f1f" fo:font-family="Arial" style:font-family-asian="Arial" style:font-family-complex="Arial" fo:font-size="12pt"/>
    </style:style>
    <style:style style:parent-style-name="142" style:family="paragraph" style:name="P18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41">
      <style:text-properties fo:color="#1f1f1f" fo:font-family="Arial" style:font-family-asian="Arial" style:font-family-complex="Arial" fo:font-size="12pt" fo:font-weight="bold"/>
    </style:style>
    <style:style style:family="paragraph" style:name="P182">
      <style:paragraph-properties fo:line-height="115%" fo:margin-left="0cm" fo:margin-right="0cm" fo:text-indent="0cm" fo:margin-top="0pt" fo:margin-bottom="0pt" fo:border="none"/>
      <style:text-properties/>
    </style:style>
    <style:style style:family="text" style:name="T542">
      <style:text-properties fo:color="#1f1f1f" fo:font-family="Arial" style:font-family-asian="Arial" style:font-family-complex="Arial" fo:font-size="12pt"/>
    </style:style>
    <style:style style:parent-style-name="142" style:family="paragraph" style:name="P18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43">
      <style:text-properties fo:color="#1f1f1f" fo:font-family="Arial" style:font-family-asian="Arial" style:font-family-complex="Arial" fo:font-size="12pt" fo:font-weight="bold"/>
    </style:style>
    <style:style style:family="paragraph" style:name="P184">
      <style:paragraph-properties fo:line-height="115%" fo:margin-left="0cm" fo:margin-right="0cm" fo:text-indent="0cm" fo:margin-top="0pt" fo:margin-bottom="0pt" fo:border="none"/>
      <style:text-properties/>
    </style:style>
    <style:style style:family="text" style:name="T544">
      <style:text-properties fo:color="#1f1f1f" fo:font-family="Arial" style:font-family-asian="Arial" style:font-family-complex="Arial" fo:font-size="12pt"/>
    </style:style>
    <style:style style:parent-style-name="142" style:family="paragraph" style:name="P18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45">
      <style:text-properties fo:color="#1f1f1f" fo:font-family="Arial" style:font-family-asian="Arial" style:font-family-complex="Arial" fo:font-size="12pt" fo:font-weight="bold"/>
    </style:style>
    <style:style style:family="paragraph" style:name="P186">
      <style:paragraph-properties fo:line-height="115%" fo:margin-left="0cm" fo:margin-right="0cm" fo:text-indent="0cm" fo:margin-top="0pt" fo:margin-bottom="0pt" fo:border="none"/>
      <style:text-properties/>
    </style:style>
    <style:style style:family="text" style:name="T546">
      <style:text-properties fo:color="#1f1f1f" fo:font-family="Arial" style:font-family-asian="Arial" style:font-family-complex="Arial" fo:font-size="12pt"/>
    </style:style>
    <style:style style:parent-style-name="141" style:family="paragraph" style:name="P18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47">
      <style:text-properties fo:color="#1f1f1f" fo:font-family="Arial" style:font-family-asian="Arial" style:font-family-complex="Arial" fo:font-size="14pt" fo:font-weight="bold"/>
    </style:style>
    <style:style style:parent-style-name="668" style:list-style-name="WWNum9" style:family="paragraph" style:name="P188">
      <style:paragraph-properties fo:line-height="115%" fo:margin-right="0cm" fo:margin-top="0pt" fo:margin-bottom="0pt" fo:border="none"/>
      <style:text-properties/>
    </style:style>
    <style:style style:family="text" style:name="T548">
      <style:text-properties fo:color="#1f1f1f" fo:font-family="Arial" style:font-family-asian="Arial" style:font-family-complex="Arial" fo:font-size="12pt"/>
    </style:style>
    <style:style style:parent-style-name="668" style:list-style-name="WWNum9" style:family="paragraph" style:name="P189">
      <style:paragraph-properties fo:line-height="115%" fo:margin-right="0cm" fo:margin-top="0pt" fo:margin-bottom="0pt" fo:border="none"/>
      <style:text-properties/>
    </style:style>
    <style:style style:family="text" style:name="T549">
      <style:text-properties fo:color="#1f1f1f" fo:font-family="Arial" style:font-family-asian="Arial" style:font-family-complex="Arial" fo:font-size="12pt"/>
    </style:style>
    <style:style style:parent-style-name="668" style:list-style-name="WWNum9" style:family="paragraph" style:name="P190">
      <style:paragraph-properties fo:line-height="115%" fo:margin-right="0cm" fo:margin-top="0pt" fo:margin-bottom="0pt" fo:border="none"/>
      <style:text-properties/>
    </style:style>
    <style:style style:family="text" style:name="T550">
      <style:text-properties fo:color="#1f1f1f" fo:font-family="Arial" style:font-family-asian="Arial" style:font-family-complex="Arial" fo:font-size="12pt"/>
    </style:style>
    <style:style style:parent-style-name="668" style:list-style-name="WWNum9" style:family="paragraph" style:name="P191">
      <style:paragraph-properties fo:line-height="115%" fo:margin-right="0cm" fo:margin-top="0pt" fo:margin-bottom="0pt" fo:border="none"/>
      <style:text-properties/>
    </style:style>
    <style:style style:family="text" style:name="T551">
      <style:text-properties fo:color="#1f1f1f" fo:font-family="Arial" style:font-family-asian="Arial" style:font-family-complex="Arial" fo:font-size="12pt"/>
    </style:style>
    <style:style style:family="paragraph" style:name="P192">
      <style:paragraph-properties/>
      <style:text-properties fo:font-family="Arial" style:font-family-asian="Arial" style:font-family-complex="Arial" fo:font-size="12pt" style:font-size-complex="12pt"/>
    </style:style>
    <style:style style:family="text" style:name="T552">
      <style:text-properties/>
    </style:style>
    <style:style style:family="text" style:name="T553">
      <style:text-properties/>
    </style:style>
    <style:style style:family="text" style:name="T554">
      <style:text-properties/>
    </style:style>
    <style:style style:parent-style-name="141" style:family="paragraph" style:name="P19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555">
      <style:text-properties fo:color="#1f1f1f" fo:font-family="Arial" style:font-family-asian="Arial" style:font-family-complex="Arial" fo:font-size="14pt" fo:font-weight="bold"/>
    </style:style>
    <style:style style:family="paragraph" style:name="P194">
      <style:paragraph-properties fo:line-height="115%" fo:margin-left="0cm" fo:margin-right="0cm" fo:text-indent="0cm" fo:margin-top="0pt" fo:margin-bottom="0pt" fo:border="none"/>
      <style:text-properties/>
    </style:style>
    <style:style style:family="text" style:name="T556">
      <style:text-properties fo:color="#1f1f1f" fo:font-family="Arial" style:font-family-asian="Arial" style:font-family-complex="Arial" fo:font-size="12pt"/>
    </style:style>
    <style:style style:parent-style-name="142" style:family="paragraph" style:name="P19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57">
      <style:text-properties fo:color="#1f1f1f" fo:font-family="Arial" style:font-family-asian="Arial" style:font-family-complex="Arial" fo:font-size="12pt" fo:font-weight="bold"/>
    </style:style>
    <style:style style:family="paragraph" style:name="P196">
      <style:paragraph-properties fo:line-height="115%" fo:margin-left="0cm" fo:margin-right="0cm" fo:text-indent="0cm" fo:margin-top="0pt" fo:margin-bottom="0pt" fo:border="none"/>
      <style:text-properties/>
    </style:style>
    <style:style style:family="text" style:name="T558">
      <style:text-properties fo:color="#1f1f1f" fo:font-family="Arial" style:font-family-asian="Arial" style:font-family-complex="Arial" fo:font-size="12pt"/>
    </style:style>
    <style:style style:parent-style-name="142" style:family="paragraph" style:name="P19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59">
      <style:text-properties fo:color="#1f1f1f" fo:font-family="Arial" style:font-family-asian="Arial" style:font-family-complex="Arial" fo:font-size="12pt" fo:font-weight="bold"/>
    </style:style>
    <style:style style:family="paragraph" style:name="P198">
      <style:paragraph-properties fo:line-height="115%" fo:margin-left="0cm" fo:margin-right="0cm" fo:text-indent="0cm" fo:margin-top="0pt" fo:margin-bottom="0pt" fo:border="none"/>
      <style:text-properties/>
    </style:style>
    <style:style style:family="text" style:name="T560">
      <style:text-properties fo:color="#1f1f1f" fo:font-family="Arial" style:font-family-asian="Arial" style:font-family-complex="Arial" fo:font-size="12pt"/>
    </style:style>
    <style:style style:parent-style-name="142" style:family="paragraph" style:name="P19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61">
      <style:text-properties fo:color="#1f1f1f" fo:font-family="Arial" style:font-family-asian="Arial" style:font-family-complex="Arial" fo:font-size="12pt" fo:font-weight="bold"/>
    </style:style>
    <style:style style:family="paragraph" style:name="P200">
      <style:paragraph-properties fo:line-height="115%" fo:margin-left="0cm" fo:margin-right="0cm" fo:text-indent="0cm" fo:margin-top="0pt" fo:margin-bottom="0pt" fo:border="none"/>
      <style:text-properties/>
    </style:style>
    <style:style style:family="text" style:name="T562">
      <style:text-properties fo:color="#1f1f1f" fo:font-family="Arial" style:font-family-asian="Arial" style:font-family-complex="Arial" fo:font-size="12pt"/>
    </style:style>
    <style:style style:parent-style-name="142" style:family="paragraph" style:name="P20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63">
      <style:text-properties fo:color="#1f1f1f" fo:font-family="Arial" style:font-family-asian="Arial" style:font-family-complex="Arial" fo:font-size="12pt" fo:font-weight="bold"/>
    </style:style>
    <style:style style:family="paragraph" style:name="P202">
      <style:paragraph-properties fo:line-height="115%" fo:margin-left="0cm" fo:margin-right="0cm" fo:text-indent="0cm" fo:margin-top="0pt" fo:margin-bottom="0pt" fo:border="none"/>
      <style:text-properties/>
    </style:style>
    <style:style style:family="text" style:name="T564">
      <style:text-properties fo:color="#1f1f1f" fo:font-family="Arial" style:font-family-asian="Arial" style:font-family-complex="Arial" fo:font-size="12pt"/>
    </style:style>
    <style:style style:parent-style-name="141" style:family="paragraph" style:name="P20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65">
      <style:text-properties fo:color="#1f1f1f" fo:font-family="Arial" style:font-family-asian="Arial" style:font-family-complex="Arial" fo:font-size="14pt" fo:font-weight="bold"/>
    </style:style>
    <style:style style:parent-style-name="668" style:list-style-name="WWNum10" style:family="paragraph" style:name="P204">
      <style:paragraph-properties fo:line-height="115%" fo:margin-right="0cm" fo:margin-top="0pt" fo:margin-bottom="0pt" fo:border="none"/>
      <style:text-properties/>
    </style:style>
    <style:style style:family="text" style:name="T566">
      <style:text-properties fo:color="#1f1f1f" fo:font-family="Arial" style:font-family-asian="Arial" style:font-family-complex="Arial" fo:font-size="12pt"/>
    </style:style>
    <style:style style:parent-style-name="668" style:list-style-name="WWNum10" style:family="paragraph" style:name="P205">
      <style:paragraph-properties fo:line-height="115%" fo:margin-right="0cm" fo:margin-top="0pt" fo:margin-bottom="0pt" fo:border="none"/>
      <style:text-properties/>
    </style:style>
    <style:style style:family="text" style:name="T567">
      <style:text-properties fo:color="#1f1f1f" fo:font-family="Arial" style:font-family-asian="Arial" style:font-family-complex="Arial" fo:font-size="12pt"/>
    </style:style>
    <style:style style:parent-style-name="668" style:list-style-name="WWNum10" style:family="paragraph" style:name="P206">
      <style:paragraph-properties fo:line-height="115%" fo:margin-right="0cm" fo:margin-top="0pt" fo:margin-bottom="0pt" fo:border="none"/>
      <style:text-properties/>
    </style:style>
    <style:style style:family="text" style:name="T568">
      <style:text-properties fo:color="#1f1f1f" fo:font-family="Arial" style:font-family-asian="Arial" style:font-family-complex="Arial" fo:font-size="12pt"/>
    </style:style>
    <style:style style:parent-style-name="668" style:list-style-name="WWNum10" style:family="paragraph" style:name="P207">
      <style:paragraph-properties fo:line-height="115%" fo:margin-right="0cm" fo:margin-top="0pt" fo:margin-bottom="0pt" fo:border="none"/>
      <style:text-properties/>
    </style:style>
    <style:style style:family="text" style:name="T569">
      <style:text-properties fo:color="#1f1f1f" fo:font-family="Arial" style:font-family-asian="Arial" style:font-family-complex="Arial" fo:font-size="12pt"/>
    </style:style>
    <style:style style:family="paragraph" style:name="P208">
      <style:paragraph-properties/>
      <style:text-properties fo:font-family="Arial" style:font-family-asian="Arial" style:font-family-complex="Arial" fo:font-size="12pt" style:font-size-complex="12pt"/>
    </style:style>
    <style:style style:family="text" style:name="T570">
      <style:text-properties/>
    </style:style>
    <style:style style:family="text" style:name="T571">
      <style:text-properties/>
    </style:style>
    <style:style style:family="text" style:name="T572">
      <style:text-properties/>
    </style:style>
    <style:style style:parent-style-name="141" style:family="paragraph" style:name="P209">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573">
      <style:text-properties fo:color="#1f1f1f" fo:font-family="Arial" style:font-family-asian="Arial" style:font-family-complex="Arial" fo:font-size="14pt" fo:font-weight="bold"/>
    </style:style>
    <style:style style:family="paragraph" style:name="P210">
      <style:paragraph-properties fo:line-height="115%" fo:margin-left="0cm" fo:margin-right="0cm" fo:text-indent="0cm" fo:margin-top="0pt" fo:margin-bottom="0pt" fo:border="none"/>
      <style:text-properties/>
    </style:style>
    <style:style style:family="text" style:name="T574">
      <style:text-properties fo:color="#1f1f1f" fo:font-family="Arial" style:font-family-asian="Arial" style:font-family-complex="Arial" fo:font-size="12pt"/>
    </style:style>
    <style:style style:parent-style-name="142" style:family="paragraph" style:name="P21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75">
      <style:text-properties fo:color="#1f1f1f" fo:font-family="Arial" style:font-family-asian="Arial" style:font-family-complex="Arial" fo:font-size="12pt" fo:font-weight="bold"/>
    </style:style>
    <style:style style:family="paragraph" style:name="P212">
      <style:paragraph-properties fo:line-height="115%" fo:margin-left="0cm" fo:margin-right="0cm" fo:text-indent="0cm" fo:margin-top="0pt" fo:margin-bottom="0pt" fo:border="none"/>
      <style:text-properties/>
    </style:style>
    <style:style style:family="text" style:name="T576">
      <style:text-properties fo:color="#1f1f1f" fo:font-family="Arial" style:font-family-asian="Arial" style:font-family-complex="Arial" fo:font-size="12pt"/>
    </style:style>
    <style:style style:parent-style-name="142" style:family="paragraph" style:name="P21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77">
      <style:text-properties fo:color="#1f1f1f" fo:font-family="Arial" style:font-family-asian="Arial" style:font-family-complex="Arial" fo:font-size="12pt" fo:font-weight="bold"/>
    </style:style>
    <style:style style:family="paragraph" style:name="P214">
      <style:paragraph-properties fo:line-height="115%" fo:margin-left="0cm" fo:margin-right="0cm" fo:text-indent="0cm" fo:margin-top="0pt" fo:margin-bottom="0pt" fo:border="none"/>
      <style:text-properties/>
    </style:style>
    <style:style style:family="text" style:name="T578">
      <style:text-properties fo:color="#1f1f1f" fo:font-family="Arial" style:font-family-asian="Arial" style:font-family-complex="Arial" fo:font-size="12pt"/>
    </style:style>
    <style:style style:parent-style-name="142" style:family="paragraph" style:name="P21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79">
      <style:text-properties fo:color="#1f1f1f" fo:font-family="Arial" style:font-family-asian="Arial" style:font-family-complex="Arial" fo:font-size="12pt" fo:font-weight="bold"/>
    </style:style>
    <style:style style:family="paragraph" style:name="P216">
      <style:paragraph-properties fo:line-height="115%" fo:margin-left="0cm" fo:margin-right="0cm" fo:text-indent="0cm" fo:margin-top="0pt" fo:margin-bottom="0pt" fo:border="none"/>
      <style:text-properties/>
    </style:style>
    <style:style style:family="text" style:name="T580">
      <style:text-properties fo:color="#1f1f1f" fo:font-family="Arial" style:font-family-asian="Arial" style:font-family-complex="Arial" fo:font-size="12pt"/>
    </style:style>
    <style:style style:parent-style-name="142" style:family="paragraph" style:name="P21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81">
      <style:text-properties fo:color="#1f1f1f" fo:font-family="Arial" style:font-family-asian="Arial" style:font-family-complex="Arial" fo:font-size="12pt" fo:font-weight="bold"/>
    </style:style>
    <style:style style:family="paragraph" style:name="P218">
      <style:paragraph-properties fo:line-height="115%" fo:margin-left="0cm" fo:margin-right="0cm" fo:text-indent="0cm" fo:margin-top="0pt" fo:margin-bottom="0pt" fo:border="none"/>
      <style:text-properties/>
    </style:style>
    <style:style style:family="text" style:name="T582">
      <style:text-properties fo:color="#1f1f1f" fo:font-family="Arial" style:font-family-asian="Arial" style:font-family-complex="Arial" fo:font-size="12pt"/>
    </style:style>
    <style:style style:parent-style-name="141" style:family="paragraph" style:name="P21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83">
      <style:text-properties fo:color="#1f1f1f" fo:font-family="Arial" style:font-family-asian="Arial" style:font-family-complex="Arial" fo:font-size="14pt" fo:font-weight="bold"/>
    </style:style>
    <style:style style:parent-style-name="668" style:list-style-name="WWNum11" style:family="paragraph" style:name="P220">
      <style:paragraph-properties fo:line-height="115%" fo:margin-right="0cm" fo:margin-top="0pt" fo:margin-bottom="0pt" fo:border="none"/>
      <style:text-properties/>
    </style:style>
    <style:style style:family="text" style:name="T584">
      <style:text-properties fo:color="#1f1f1f" fo:font-family="Arial" style:font-family-asian="Arial" style:font-family-complex="Arial" fo:font-size="12pt"/>
    </style:style>
    <style:style style:parent-style-name="668" style:list-style-name="WWNum11" style:family="paragraph" style:name="P221">
      <style:paragraph-properties fo:line-height="115%" fo:margin-right="0cm" fo:margin-top="0pt" fo:margin-bottom="0pt" fo:border="none"/>
      <style:text-properties/>
    </style:style>
    <style:style style:family="text" style:name="T585">
      <style:text-properties fo:color="#1f1f1f" fo:font-family="Arial" style:font-family-asian="Arial" style:font-family-complex="Arial" fo:font-size="12pt"/>
    </style:style>
    <style:style style:parent-style-name="668" style:list-style-name="WWNum11" style:family="paragraph" style:name="P222">
      <style:paragraph-properties fo:line-height="115%" fo:margin-right="0cm" fo:margin-top="0pt" fo:margin-bottom="0pt" fo:border="none"/>
      <style:text-properties/>
    </style:style>
    <style:style style:family="text" style:name="T586">
      <style:text-properties fo:color="#1f1f1f" fo:font-family="Arial" style:font-family-asian="Arial" style:font-family-complex="Arial" fo:font-size="12pt"/>
    </style:style>
    <style:style style:parent-style-name="668" style:list-style-name="WWNum11" style:family="paragraph" style:name="P223">
      <style:paragraph-properties fo:line-height="115%" fo:margin-right="0cm" fo:margin-top="0pt" fo:margin-bottom="0pt" fo:border="none"/>
      <style:text-properties/>
    </style:style>
    <style:style style:family="text" style:name="T587">
      <style:text-properties fo:color="#1f1f1f" fo:font-family="Arial" style:font-family-asian="Arial" style:font-family-complex="Arial" fo:font-size="12pt"/>
    </style:style>
    <style:style style:family="paragraph" style:name="P224">
      <style:paragraph-properties/>
      <style:text-properties fo:font-family="Arial" style:font-family-asian="Arial" style:font-family-complex="Arial" fo:font-size="12pt" style:font-size-complex="12pt"/>
    </style:style>
    <style:style style:family="text" style:name="T588">
      <style:text-properties/>
    </style:style>
    <style:style style:family="text" style:name="T589">
      <style:text-properties/>
    </style:style>
    <style:style style:family="text" style:name="T590">
      <style:text-properties/>
    </style:style>
    <style:style style:parent-style-name="141" style:family="paragraph" style:name="P225">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591">
      <style:text-properties fo:color="#1f1f1f" fo:font-family="Arial" style:font-family-asian="Arial" style:font-family-complex="Arial" fo:font-size="14pt" fo:font-weight="bold"/>
    </style:style>
    <style:style style:family="paragraph" style:name="P226">
      <style:paragraph-properties fo:line-height="115%" fo:margin-left="0cm" fo:margin-right="0cm" fo:text-indent="0cm" fo:margin-top="0pt" fo:margin-bottom="0pt" fo:border="none"/>
      <style:text-properties/>
    </style:style>
    <style:style style:family="text" style:name="T592">
      <style:text-properties fo:color="#1f1f1f" fo:font-family="Arial" style:font-family-asian="Arial" style:font-family-complex="Arial" fo:font-size="12pt"/>
    </style:style>
    <style:style style:parent-style-name="142" style:family="paragraph" style:name="P22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93">
      <style:text-properties fo:color="#1f1f1f" fo:font-family="Arial" style:font-family-asian="Arial" style:font-family-complex="Arial" fo:font-size="12pt" fo:font-weight="bold"/>
    </style:style>
    <style:style style:family="paragraph" style:name="P228">
      <style:paragraph-properties fo:line-height="115%" fo:margin-left="0cm" fo:margin-right="0cm" fo:text-indent="0cm" fo:margin-top="0pt" fo:margin-bottom="0pt" fo:border="none"/>
      <style:text-properties/>
    </style:style>
    <style:style style:family="text" style:name="T594">
      <style:text-properties fo:color="#1f1f1f" fo:font-family="Arial" style:font-family-asian="Arial" style:font-family-complex="Arial" fo:font-size="12pt"/>
    </style:style>
    <style:style style:parent-style-name="142" style:family="paragraph" style:name="P22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95">
      <style:text-properties fo:color="#1f1f1f" fo:font-family="Arial" style:font-family-asian="Arial" style:font-family-complex="Arial" fo:font-size="12pt" fo:font-weight="bold"/>
    </style:style>
    <style:style style:family="paragraph" style:name="P230">
      <style:paragraph-properties fo:line-height="115%" fo:margin-left="0cm" fo:margin-right="0cm" fo:text-indent="0cm" fo:margin-top="0pt" fo:margin-bottom="0pt" fo:border="none"/>
      <style:text-properties/>
    </style:style>
    <style:style style:family="text" style:name="T596">
      <style:text-properties fo:color="#1f1f1f" fo:font-family="Arial" style:font-family-asian="Arial" style:font-family-complex="Arial" fo:font-size="12pt"/>
    </style:style>
    <style:style style:parent-style-name="142" style:family="paragraph" style:name="P23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97">
      <style:text-properties fo:color="#1f1f1f" fo:font-family="Arial" style:font-family-asian="Arial" style:font-family-complex="Arial" fo:font-size="12pt" fo:font-weight="bold"/>
    </style:style>
    <style:style style:family="paragraph" style:name="P232">
      <style:paragraph-properties fo:line-height="115%" fo:margin-left="0cm" fo:margin-right="0cm" fo:text-indent="0cm" fo:margin-top="0pt" fo:margin-bottom="0pt" fo:border="none"/>
      <style:text-properties/>
    </style:style>
    <style:style style:family="text" style:name="T598">
      <style:text-properties fo:color="#1f1f1f" fo:font-family="Arial" style:font-family-asian="Arial" style:font-family-complex="Arial" fo:font-size="12pt"/>
    </style:style>
    <style:style style:parent-style-name="142" style:family="paragraph" style:name="P23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99">
      <style:text-properties fo:color="#1f1f1f" fo:font-family="Arial" style:font-family-asian="Arial" style:font-family-complex="Arial" fo:font-size="12pt" fo:font-weight="bold"/>
    </style:style>
    <style:style style:family="paragraph" style:name="P234">
      <style:paragraph-properties fo:line-height="115%" fo:margin-left="0cm" fo:margin-right="0cm" fo:text-indent="0cm" fo:margin-top="0pt" fo:margin-bottom="0pt" fo:border="none"/>
      <style:text-properties/>
    </style:style>
    <style:style style:family="text" style:name="T600">
      <style:text-properties fo:color="#1f1f1f" fo:font-family="Arial" style:font-family-asian="Arial" style:font-family-complex="Arial" fo:font-size="12pt"/>
    </style:style>
    <style:style style:parent-style-name="141" style:family="paragraph" style:name="P23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01">
      <style:text-properties fo:color="#1f1f1f" fo:font-family="Arial" style:font-family-asian="Arial" style:font-family-complex="Arial" fo:font-size="14pt" fo:font-weight="bold"/>
    </style:style>
    <style:style style:parent-style-name="668" style:list-style-name="WWNum12" style:family="paragraph" style:name="P236">
      <style:paragraph-properties fo:line-height="115%" fo:margin-right="0cm" fo:margin-top="0pt" fo:margin-bottom="0pt" fo:border="none"/>
      <style:text-properties/>
    </style:style>
    <style:style style:family="text" style:name="T602">
      <style:text-properties fo:color="#1f1f1f" fo:font-family="Arial" style:font-family-asian="Arial" style:font-family-complex="Arial" fo:font-size="12pt"/>
    </style:style>
    <style:style style:parent-style-name="668" style:list-style-name="WWNum12" style:family="paragraph" style:name="P237">
      <style:paragraph-properties fo:line-height="115%" fo:margin-right="0cm" fo:margin-top="0pt" fo:margin-bottom="0pt" fo:border="none"/>
      <style:text-properties/>
    </style:style>
    <style:style style:family="text" style:name="T603">
      <style:text-properties fo:color="#1f1f1f" fo:font-family="Arial" style:font-family-asian="Arial" style:font-family-complex="Arial" fo:font-size="12pt"/>
    </style:style>
    <style:style style:parent-style-name="668" style:list-style-name="WWNum12" style:family="paragraph" style:name="P238">
      <style:paragraph-properties fo:line-height="115%" fo:margin-right="0cm" fo:margin-top="0pt" fo:margin-bottom="0pt" fo:border="none"/>
      <style:text-properties/>
    </style:style>
    <style:style style:family="text" style:name="T604">
      <style:text-properties fo:color="#1f1f1f" fo:font-family="Arial" style:font-family-asian="Arial" style:font-family-complex="Arial" fo:font-size="12pt"/>
    </style:style>
    <style:style style:parent-style-name="668" style:list-style-name="WWNum12" style:family="paragraph" style:name="P239">
      <style:paragraph-properties fo:line-height="115%" fo:margin-right="0cm" fo:margin-top="0pt" fo:margin-bottom="0pt" fo:border="none"/>
      <style:text-properties/>
    </style:style>
    <style:style style:family="text" style:name="T605">
      <style:text-properties fo:color="#1f1f1f" fo:font-family="Arial" style:font-family-asian="Arial" style:font-family-complex="Arial" fo:font-size="12pt"/>
    </style:style>
    <style:style style:family="paragraph" style:name="P240">
      <style:paragraph-properties/>
      <style:text-properties fo:font-family="Arial" style:font-family-asian="Arial" style:font-family-complex="Arial" fo:font-size="12pt" style:font-size-complex="12pt"/>
    </style:style>
    <style:style style:family="text" style:name="T606">
      <style:text-properties/>
    </style:style>
    <style:style style:family="text" style:name="T607">
      <style:text-properties/>
    </style:style>
    <style:style style:family="text" style:name="T608">
      <style:text-properties/>
    </style:style>
    <style:style style:family="paragraph" style:name="P241">
      <style:paragraph-properties fo:line-height="115%" fo:margin-left="0cm" fo:margin-right="0cm" fo:text-indent="0cm" fo:margin-top="0pt" fo:margin-bottom="0pt" fo:break-before="page" fo:border="none"/>
      <style:text-properties/>
    </style:style>
    <style:style style:family="text" style:name="T609">
      <style:text-properties fo:color="#1f1f1f" fo:font-family="Arial" style:font-family-asian="Arial" style:font-family-complex="Arial" fo:font-size="12pt"/>
    </style:style>
    <style:style style:parent-style-name="141" style:family="paragraph" style:name="P24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10">
      <style:text-properties fo:color="#1f1f1f" fo:font-family="Arial" style:font-family-asian="Arial" style:font-family-complex="Arial" fo:font-size="14pt" fo:font-weight="bold"/>
    </style:style>
    <style:style style:family="paragraph" style:name="P243">
      <style:paragraph-properties fo:line-height="115%" fo:margin-left="0cm" fo:margin-right="0cm" fo:text-indent="0cm" fo:margin-top="0pt" fo:margin-bottom="0pt" fo:border="none"/>
      <style:text-properties/>
    </style:style>
    <style:style style:family="text" style:name="T611">
      <style:text-properties fo:color="#1f1f1f" fo:font-family="Arial" style:font-family-asian="Arial" style:font-family-complex="Arial" fo:font-size="12pt"/>
    </style:style>
    <style:style style:parent-style-name="142" style:family="paragraph" style:name="P24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12">
      <style:text-properties fo:color="#1f1f1f" fo:font-family="Arial" style:font-family-asian="Arial" style:font-family-complex="Arial" fo:font-size="12pt" fo:font-weight="bold"/>
    </style:style>
    <style:style style:family="paragraph" style:name="P245">
      <style:paragraph-properties fo:line-height="115%" fo:margin-left="0cm" fo:margin-right="0cm" fo:text-indent="0cm" fo:margin-top="0pt" fo:margin-bottom="0pt" fo:border="none"/>
      <style:text-properties/>
    </style:style>
    <style:style style:family="text" style:name="T613">
      <style:text-properties fo:color="#1f1f1f" fo:font-family="Arial" style:font-family-asian="Arial" style:font-family-complex="Arial" fo:font-size="12pt"/>
    </style:style>
    <style:style style:parent-style-name="142" style:family="paragraph" style:name="P24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14">
      <style:text-properties fo:color="#1f1f1f" fo:font-family="Arial" style:font-family-asian="Arial" style:font-family-complex="Arial" fo:font-size="12pt" fo:font-weight="bold"/>
    </style:style>
    <style:style style:family="paragraph" style:name="P247">
      <style:paragraph-properties fo:line-height="115%" fo:margin-left="0cm" fo:margin-right="0cm" fo:text-indent="0cm" fo:margin-top="0pt" fo:margin-bottom="0pt" fo:border="none"/>
      <style:text-properties/>
    </style:style>
    <style:style style:family="text" style:name="T615">
      <style:text-properties fo:color="#1f1f1f" fo:font-family="Arial" style:font-family-asian="Arial" style:font-family-complex="Arial" fo:font-size="12pt"/>
    </style:style>
    <style:style style:parent-style-name="142" style:family="paragraph" style:name="P24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16">
      <style:text-properties fo:color="#1f1f1f" fo:font-family="Arial" style:font-family-asian="Arial" style:font-family-complex="Arial" fo:font-size="12pt" fo:font-weight="bold"/>
    </style:style>
    <style:style style:family="paragraph" style:name="P249">
      <style:paragraph-properties fo:line-height="115%" fo:margin-left="0cm" fo:margin-right="0cm" fo:text-indent="0cm" fo:margin-top="0pt" fo:margin-bottom="0pt" fo:border="none"/>
      <style:text-properties/>
    </style:style>
    <style:style style:family="text" style:name="T617">
      <style:text-properties fo:color="#1f1f1f" fo:font-family="Arial" style:font-family-asian="Arial" style:font-family-complex="Arial" fo:font-size="12pt"/>
    </style:style>
    <style:style style:parent-style-name="142" style:family="paragraph" style:name="P25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18">
      <style:text-properties fo:color="#1f1f1f" fo:font-family="Arial" style:font-family-asian="Arial" style:font-family-complex="Arial" fo:font-size="12pt" fo:font-weight="bold"/>
    </style:style>
    <style:style style:family="paragraph" style:name="P251">
      <style:paragraph-properties fo:line-height="115%" fo:margin-left="0cm" fo:margin-right="0cm" fo:text-indent="0cm" fo:margin-top="0pt" fo:margin-bottom="0pt" fo:border="none"/>
      <style:text-properties/>
    </style:style>
    <style:style style:family="text" style:name="T619">
      <style:text-properties fo:color="#1f1f1f" fo:font-family="Arial" style:font-family-asian="Arial" style:font-family-complex="Arial" fo:font-size="12pt"/>
    </style:style>
    <style:style style:parent-style-name="141" style:family="paragraph" style:name="P25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20">
      <style:text-properties fo:color="#1f1f1f" fo:font-family="Arial" style:font-family-asian="Arial" style:font-family-complex="Arial" fo:font-size="14pt" fo:font-weight="bold"/>
    </style:style>
    <style:style style:parent-style-name="668" style:list-style-name="WWNum13" style:family="paragraph" style:name="P253">
      <style:paragraph-properties fo:line-height="115%" fo:margin-right="0cm" fo:margin-top="0pt" fo:margin-bottom="0pt" fo:border="none"/>
      <style:text-properties/>
    </style:style>
    <style:style style:family="text" style:name="T621">
      <style:text-properties fo:color="#1f1f1f" fo:font-family="Arial" style:font-family-asian="Arial" style:font-family-complex="Arial" fo:font-size="12pt"/>
    </style:style>
    <style:style style:parent-style-name="668" style:list-style-name="WWNum13" style:family="paragraph" style:name="P254">
      <style:paragraph-properties fo:line-height="115%" fo:margin-right="0cm" fo:margin-top="0pt" fo:margin-bottom="0pt" fo:border="none"/>
      <style:text-properties/>
    </style:style>
    <style:style style:family="text" style:name="T622">
      <style:text-properties fo:color="#1f1f1f" fo:font-family="Arial" style:font-family-asian="Arial" style:font-family-complex="Arial" fo:font-size="12pt"/>
    </style:style>
    <style:style style:parent-style-name="668" style:list-style-name="WWNum13" style:family="paragraph" style:name="P255">
      <style:paragraph-properties fo:line-height="115%" fo:margin-right="0cm" fo:margin-top="0pt" fo:margin-bottom="0pt" fo:border="none"/>
      <style:text-properties/>
    </style:style>
    <style:style style:family="text" style:name="T623">
      <style:text-properties fo:color="#1f1f1f" fo:font-family="Arial" style:font-family-asian="Arial" style:font-family-complex="Arial" fo:font-size="12pt"/>
    </style:style>
    <style:style style:parent-style-name="668" style:list-style-name="WWNum13" style:family="paragraph" style:name="P256">
      <style:paragraph-properties fo:line-height="115%" fo:margin-right="0cm" fo:margin-top="0pt" fo:margin-bottom="0pt" fo:border="none"/>
      <style:text-properties/>
    </style:style>
    <style:style style:family="text" style:name="T624">
      <style:text-properties fo:color="#1f1f1f" fo:font-family="Arial" style:font-family-asian="Arial" style:font-family-complex="Arial" fo:font-size="12pt"/>
    </style:style>
    <style:style style:family="paragraph" style:name="P257">
      <style:paragraph-properties/>
      <style:text-properties fo:font-family="Arial" style:font-family-asian="Arial" style:font-family-complex="Arial" fo:font-size="12pt" style:font-size-complex="12pt"/>
    </style:style>
    <style:style style:family="text" style:name="T625">
      <style:text-properties/>
    </style:style>
    <style:style style:family="text" style:name="T626">
      <style:text-properties/>
    </style:style>
    <style:style style:family="text" style:name="T627">
      <style:text-properties/>
    </style:style>
    <style:style style:parent-style-name="141" style:family="paragraph" style:name="P258">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628">
      <style:text-properties fo:color="#1f1f1f" fo:font-family="Arial" style:font-family-asian="Arial" style:font-family-complex="Arial" fo:font-size="14pt" fo:font-weight="bold"/>
    </style:style>
    <style:style style:family="paragraph" style:name="P259">
      <style:paragraph-properties fo:line-height="115%" fo:margin-left="0cm" fo:margin-right="0cm" fo:text-indent="0cm" fo:margin-top="0pt" fo:margin-bottom="0pt" fo:border="none"/>
      <style:text-properties/>
    </style:style>
    <style:style style:family="text" style:name="T629">
      <style:text-properties fo:color="#1f1f1f" fo:font-family="Arial" style:font-family-asian="Arial" style:font-family-complex="Arial" fo:font-size="12pt"/>
    </style:style>
    <style:style style:parent-style-name="142" style:family="paragraph" style:name="P26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30">
      <style:text-properties fo:color="#1f1f1f" fo:font-family="Arial" style:font-family-asian="Arial" style:font-family-complex="Arial" fo:font-size="12pt" fo:font-weight="bold"/>
    </style:style>
    <style:style style:family="paragraph" style:name="P261">
      <style:paragraph-properties fo:line-height="115%" fo:margin-left="0cm" fo:margin-right="0cm" fo:text-indent="0cm" fo:margin-top="0pt" fo:margin-bottom="0pt" fo:border="none"/>
      <style:text-properties/>
    </style:style>
    <style:style style:family="text" style:name="T631">
      <style:text-properties fo:color="#1f1f1f" fo:font-family="Arial" style:font-family-asian="Arial" style:font-family-complex="Arial" fo:font-size="12pt"/>
    </style:style>
    <style:style style:parent-style-name="142" style:family="paragraph" style:name="P26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32">
      <style:text-properties fo:color="#1f1f1f" fo:font-family="Arial" style:font-family-asian="Arial" style:font-family-complex="Arial" fo:font-size="12pt" fo:font-weight="bold"/>
    </style:style>
    <style:style style:family="paragraph" style:name="P263">
      <style:paragraph-properties fo:line-height="115%" fo:margin-left="0cm" fo:margin-right="0cm" fo:text-indent="0cm" fo:margin-top="0pt" fo:margin-bottom="0pt" fo:border="none"/>
      <style:text-properties/>
    </style:style>
    <style:style style:family="text" style:name="T633">
      <style:text-properties fo:color="#1f1f1f" fo:font-family="Arial" style:font-family-asian="Arial" style:font-family-complex="Arial" fo:font-size="12pt"/>
    </style:style>
    <style:style style:parent-style-name="142" style:family="paragraph" style:name="P26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34">
      <style:text-properties fo:color="#1f1f1f" fo:font-family="Arial" style:font-family-asian="Arial" style:font-family-complex="Arial" fo:font-size="12pt" fo:font-weight="bold"/>
    </style:style>
    <style:style style:family="paragraph" style:name="P265">
      <style:paragraph-properties fo:line-height="115%" fo:margin-left="0cm" fo:margin-right="0cm" fo:text-indent="0cm" fo:margin-top="0pt" fo:margin-bottom="0pt" fo:border="none"/>
      <style:text-properties/>
    </style:style>
    <style:style style:family="text" style:name="T635">
      <style:text-properties fo:color="#1f1f1f" fo:font-family="Arial" style:font-family-asian="Arial" style:font-family-complex="Arial" fo:font-size="12pt"/>
    </style:style>
    <style:style style:parent-style-name="142" style:family="paragraph" style:name="P26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36">
      <style:text-properties fo:color="#1f1f1f" fo:font-family="Arial" style:font-family-asian="Arial" style:font-family-complex="Arial" fo:font-size="12pt" fo:font-weight="bold"/>
    </style:style>
    <style:style style:family="paragraph" style:name="P267">
      <style:paragraph-properties fo:line-height="115%" fo:margin-left="0cm" fo:margin-right="0cm" fo:text-indent="0cm" fo:margin-top="0pt" fo:margin-bottom="0pt" fo:border="none"/>
      <style:text-properties/>
    </style:style>
    <style:style style:family="text" style:name="T637">
      <style:text-properties fo:color="#1f1f1f" fo:font-family="Arial" style:font-family-asian="Arial" style:font-family-complex="Arial" fo:font-size="12pt"/>
    </style:style>
    <style:style style:parent-style-name="141" style:family="paragraph" style:name="P26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38">
      <style:text-properties fo:color="#1f1f1f" fo:font-family="Arial" style:font-family-asian="Arial" style:font-family-complex="Arial" fo:font-size="14pt" fo:font-weight="bold"/>
    </style:style>
    <style:style style:parent-style-name="668" style:list-style-name="WWNum14" style:family="paragraph" style:name="P269">
      <style:paragraph-properties fo:line-height="115%" fo:margin-right="0cm" fo:margin-top="0pt" fo:margin-bottom="0pt" fo:border="none"/>
      <style:text-properties/>
    </style:style>
    <style:style style:family="text" style:name="T639">
      <style:text-properties fo:color="#1f1f1f" fo:font-family="Arial" style:font-family-asian="Arial" style:font-family-complex="Arial" fo:font-size="12pt"/>
    </style:style>
    <style:style style:parent-style-name="668" style:list-style-name="WWNum14" style:family="paragraph" style:name="P270">
      <style:paragraph-properties fo:line-height="115%" fo:margin-right="0cm" fo:margin-top="0pt" fo:margin-bottom="0pt" fo:border="none"/>
      <style:text-properties/>
    </style:style>
    <style:style style:family="text" style:name="T640">
      <style:text-properties fo:color="#1f1f1f" fo:font-family="Arial" style:font-family-asian="Arial" style:font-family-complex="Arial" fo:font-size="12pt"/>
    </style:style>
    <style:style style:parent-style-name="668" style:list-style-name="WWNum14" style:family="paragraph" style:name="P271">
      <style:paragraph-properties fo:line-height="115%" fo:margin-right="0cm" fo:margin-top="0pt" fo:margin-bottom="0pt" fo:border="none"/>
      <style:text-properties/>
    </style:style>
    <style:style style:family="text" style:name="T641">
      <style:text-properties fo:color="#1f1f1f" fo:font-family="Arial" style:font-family-asian="Arial" style:font-family-complex="Arial" fo:font-size="12pt"/>
    </style:style>
    <style:style style:parent-style-name="668" style:list-style-name="WWNum14" style:family="paragraph" style:name="P272">
      <style:paragraph-properties fo:line-height="115%" fo:margin-right="0cm" fo:margin-top="0pt" fo:margin-bottom="0pt" fo:border="none"/>
      <style:text-properties/>
    </style:style>
    <style:style style:family="text" style:name="T642">
      <style:text-properties fo:color="#1f1f1f" fo:font-family="Arial" style:font-family-asian="Arial" style:font-family-complex="Arial" fo:font-size="12pt"/>
    </style:style>
    <style:style style:family="paragraph" style:name="P273">
      <style:paragraph-properties/>
      <style:text-properties fo:font-family="Arial" style:font-family-asian="Arial" style:font-family-complex="Arial" fo:font-size="12pt" style:font-size-complex="12pt"/>
    </style:style>
    <style:style style:family="text" style:name="T643">
      <style:text-properties/>
    </style:style>
    <style:style style:family="text" style:name="T644">
      <style:text-properties/>
    </style:style>
    <style:style style:family="text" style:name="T645">
      <style:text-properties/>
    </style:style>
    <style:style style:parent-style-name="141" style:family="paragraph" style:name="P274">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646">
      <style:text-properties fo:color="#1f1f1f" fo:font-family="Arial" style:font-family-asian="Arial" style:font-family-complex="Arial" fo:font-size="14pt" fo:font-weight="bold"/>
    </style:style>
    <style:style style:family="paragraph" style:name="P275">
      <style:paragraph-properties fo:line-height="115%" fo:margin-left="0cm" fo:margin-right="0cm" fo:text-indent="0cm" fo:margin-top="0pt" fo:margin-bottom="0pt" fo:border="none"/>
      <style:text-properties/>
    </style:style>
    <style:style style:family="text" style:name="T647">
      <style:text-properties fo:color="#1f1f1f" fo:font-family="Arial" style:font-family-asian="Arial" style:font-family-complex="Arial" fo:font-size="12pt"/>
    </style:style>
    <style:style style:parent-style-name="142" style:family="paragraph" style:name="P27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48">
      <style:text-properties fo:color="#1f1f1f" fo:font-family="Arial" style:font-family-asian="Arial" style:font-family-complex="Arial" fo:font-size="12pt" fo:font-weight="bold"/>
    </style:style>
    <style:style style:family="paragraph" style:name="P277">
      <style:paragraph-properties fo:line-height="115%" fo:margin-left="0cm" fo:margin-right="0cm" fo:text-indent="0cm" fo:margin-top="0pt" fo:margin-bottom="0pt" fo:border="none"/>
      <style:text-properties/>
    </style:style>
    <style:style style:family="text" style:name="T649">
      <style:text-properties fo:color="#1f1f1f" fo:font-family="Arial" style:font-family-asian="Arial" style:font-family-complex="Arial" fo:font-size="12pt"/>
    </style:style>
    <style:style style:family="text" style:name="T650">
      <style:text-properties fo:color="#1f1f1f" fo:font-family="Arial" style:font-family-asian="Arial" style:font-family-complex="Arial" fo:font-size="12pt"/>
    </style:style>
    <style:style style:parent-style-name="142" style:family="paragraph" style:name="P27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51">
      <style:text-properties fo:color="#1f1f1f" fo:font-family="Arial" style:font-family-asian="Arial" style:font-family-complex="Arial" fo:font-size="12pt" fo:font-weight="bold"/>
    </style:style>
    <style:style style:family="paragraph" style:name="P279">
      <style:paragraph-properties fo:line-height="115%" fo:margin-left="0cm" fo:margin-right="0cm" fo:text-indent="0cm" fo:margin-top="0pt" fo:margin-bottom="0pt" fo:border="none"/>
      <style:text-properties/>
    </style:style>
    <style:style style:family="text" style:name="T652">
      <style:text-properties fo:color="#1f1f1f" fo:font-family="Arial" style:font-family-asian="Arial" style:font-family-complex="Arial" fo:font-size="12pt"/>
    </style:style>
    <style:style style:family="text" style:name="T653">
      <style:text-properties fo:color="#1f1f1f" fo:font-family="Arial" style:font-family-asian="Arial" style:font-family-complex="Arial" fo:font-size="12pt"/>
    </style:style>
    <style:style style:parent-style-name="142" style:family="paragraph" style:name="P28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54">
      <style:text-properties fo:color="#1f1f1f" fo:font-family="Arial" style:font-family-asian="Arial" style:font-family-complex="Arial" fo:font-size="12pt" fo:font-weight="bold"/>
    </style:style>
    <style:style style:family="paragraph" style:name="P281">
      <style:paragraph-properties fo:line-height="115%" fo:margin-left="0cm" fo:margin-right="0cm" fo:text-indent="0cm" fo:margin-top="0pt" fo:margin-bottom="0pt" fo:border="none"/>
      <style:text-properties/>
    </style:style>
    <style:style style:family="text" style:name="T655">
      <style:text-properties fo:color="#1f1f1f" fo:font-family="Arial" style:font-family-asian="Arial" style:font-family-complex="Arial" fo:font-size="12pt"/>
    </style:style>
    <style:style style:family="text" style:name="T656">
      <style:text-properties fo:color="#1f1f1f" fo:font-family="Arial" style:font-family-asian="Arial" style:font-family-complex="Arial" fo:font-size="12pt"/>
    </style:style>
    <style:style style:parent-style-name="142" style:family="paragraph" style:name="P28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57">
      <style:text-properties fo:color="#1f1f1f" fo:font-family="Arial" style:font-family-asian="Arial" style:font-family-complex="Arial" fo:font-size="12pt" fo:font-weight="bold"/>
    </style:style>
    <style:style style:family="paragraph" style:name="P283">
      <style:paragraph-properties fo:line-height="115%" fo:margin-left="0cm" fo:margin-right="0cm" fo:text-indent="0cm" fo:margin-top="0pt" fo:margin-bottom="0pt" fo:border="none"/>
      <style:text-properties/>
    </style:style>
    <style:style style:family="text" style:name="T658">
      <style:text-properties fo:color="#1f1f1f" fo:font-family="Arial" style:font-family-asian="Arial" style:font-family-complex="Arial" fo:font-size="12pt"/>
    </style:style>
    <style:style style:family="text" style:name="T659">
      <style:text-properties fo:color="#1f1f1f" fo:font-family="Arial" style:font-family-asian="Arial" style:font-family-complex="Arial" fo:font-size="12pt"/>
    </style:style>
    <style:style style:parent-style-name="141" style:family="paragraph" style:name="P28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60">
      <style:text-properties fo:color="#1f1f1f" fo:font-family="Arial" style:font-family-asian="Arial" style:font-family-complex="Arial" fo:font-size="14pt" fo:font-weight="bold"/>
    </style:style>
    <style:style style:parent-style-name="668" style:list-style-name="WWNum15" style:family="paragraph" style:name="P285">
      <style:paragraph-properties fo:line-height="115%" fo:margin-right="0cm" fo:margin-top="0pt" fo:margin-bottom="0pt" fo:border="none"/>
      <style:text-properties/>
    </style:style>
    <style:style style:family="text" style:name="T661">
      <style:text-properties fo:color="#1f1f1f" fo:font-family="Arial" style:font-family-asian="Arial" style:font-family-complex="Arial" fo:font-size="12pt"/>
    </style:style>
    <style:style style:parent-style-name="668" style:list-style-name="WWNum15" style:family="paragraph" style:name="P286">
      <style:paragraph-properties fo:line-height="115%" fo:margin-right="0cm" fo:margin-top="0pt" fo:margin-bottom="0pt" fo:border="none"/>
      <style:text-properties/>
    </style:style>
    <style:style style:family="text" style:name="T662">
      <style:text-properties fo:color="#1f1f1f" fo:font-family="Arial" style:font-family-asian="Arial" style:font-family-complex="Arial" fo:font-size="12pt"/>
    </style:style>
    <style:style style:parent-style-name="668" style:list-style-name="WWNum15" style:family="paragraph" style:name="P287">
      <style:paragraph-properties fo:line-height="115%" fo:margin-right="0cm" fo:margin-top="0pt" fo:margin-bottom="0pt" fo:border="none"/>
      <style:text-properties/>
    </style:style>
    <style:style style:family="text" style:name="T663">
      <style:text-properties fo:color="#1f1f1f" fo:font-family="Arial" style:font-family-asian="Arial" style:font-family-complex="Arial" fo:font-size="12pt"/>
    </style:style>
    <style:style style:parent-style-name="668" style:list-style-name="WWNum15" style:family="paragraph" style:name="P288">
      <style:paragraph-properties fo:line-height="115%" fo:margin-right="0cm" fo:margin-top="0pt" fo:margin-bottom="0pt" fo:border="none"/>
      <style:text-properties/>
    </style:style>
    <style:style style:family="text" style:name="T664">
      <style:text-properties fo:color="#1f1f1f" fo:font-family="Arial" style:font-family-asian="Arial" style:font-family-complex="Arial" fo:font-size="12pt"/>
    </style:style>
    <style:style style:family="paragraph" style:name="P289">
      <style:paragraph-properties/>
      <style:text-properties fo:font-family="Arial" style:font-family-asian="Arial" style:font-family-complex="Arial" fo:font-size="12pt" style:font-size-complex="12pt"/>
    </style:style>
    <style:style style:family="text" style:name="T665">
      <style:text-properties/>
    </style:style>
    <style:style style:family="text" style:name="T666">
      <style:text-properties/>
    </style:style>
    <style:style style:family="text" style:name="T667">
      <style:text-properties/>
    </style:style>
    <style:style style:family="paragraph" style:name="P290">
      <style:paragraph-properties fo:line-height="115%" fo:margin-left="0cm" fo:margin-right="0cm" fo:text-indent="0cm" fo:margin-top="0pt" fo:margin-bottom="0pt" fo:break-before="page" fo:border="none"/>
      <style:text-properties/>
    </style:style>
    <style:style style:family="text" style:name="T668">
      <style:text-properties fo:color="#1f1f1f" fo:font-family="Arial" style:font-family-asian="Arial" style:font-family-complex="Arial" fo:font-size="12pt"/>
    </style:style>
    <style:style style:parent-style-name="141" style:family="paragraph" style:name="P29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69">
      <style:text-properties fo:color="#1f1f1f" fo:font-family="Arial" style:font-family-asian="Arial" style:font-family-complex="Arial" fo:font-size="14pt" fo:font-weight="bold"/>
    </style:style>
    <style:style style:family="paragraph" style:name="P292">
      <style:paragraph-properties fo:line-height="115%" fo:margin-left="0cm" fo:margin-right="0cm" fo:text-indent="0cm" fo:margin-top="0pt" fo:margin-bottom="0pt" fo:border="none"/>
      <style:text-properties/>
    </style:style>
    <style:style style:family="text" style:name="T670">
      <style:text-properties fo:color="#1f1f1f" fo:font-family="Arial" style:font-family-asian="Arial" style:font-family-complex="Arial" fo:font-size="12pt"/>
    </style:style>
    <style:style style:family="paragraph" style:name="P293">
      <style:paragraph-properties fo:line-height="115%" fo:margin-left="0cm" fo:margin-right="0cm" fo:text-indent="0cm" fo:margin-top="0pt" fo:margin-bottom="0pt" fo:border="none"/>
      <style:text-properties/>
    </style:style>
    <style:style style:family="text" style:name="T671">
      <style:text-properties fo:color="#1f1f1f" fo:font-family="Arial" style:font-family-asian="Arial" style:font-family-complex="Arial" fo:font-size="12pt"/>
    </style:style>
    <style:style style:family="paragraph" style:name="P294">
      <style:paragraph-properties fo:line-height="115%" fo:margin-left="0cm" fo:margin-right="0cm" fo:text-indent="0cm" fo:margin-top="0pt" fo:margin-bottom="0pt" fo:border="none"/>
      <style:text-properties/>
    </style:style>
    <style:style style:family="text" style:name="T672">
      <style:text-properties fo:color="#1f1f1f" fo:font-family="Arial" style:font-family-asian="Arial" style:font-family-complex="Arial" fo:font-size="12pt"/>
    </style:style>
    <style:style style:family="paragraph" style:name="P295">
      <style:paragraph-properties fo:line-height="115%" fo:margin-left="0cm" fo:margin-right="0cm" fo:text-indent="0cm" fo:margin-top="0pt" fo:margin-bottom="0pt" fo:border="none"/>
      <style:text-properties/>
    </style:style>
    <style:style style:family="text" style:name="T673">
      <style:text-properties fo:color="#1f1f1f" fo:font-family="Arial" style:font-family-asian="Arial" style:font-family-complex="Arial" fo:font-size="12pt"/>
    </style:style>
    <style:style style:family="paragraph" style:name="P296">
      <style:paragraph-properties fo:line-height="115%" fo:margin-left="0cm" fo:margin-right="0cm" fo:text-indent="0cm" fo:margin-top="0pt" fo:margin-bottom="0pt" fo:border="none"/>
      <style:text-properties/>
    </style:style>
    <style:style style:family="text" style:name="T674">
      <style:text-properties fo:color="#1f1f1f" fo:font-family="Arial" style:font-family-asian="Arial" style:font-family-complex="Arial" fo:font-size="12pt"/>
    </style:style>
    <style:style style:family="paragraph" style:name="P297">
      <style:paragraph-properties fo:line-height="115%" fo:margin-left="0cm" fo:margin-right="0cm" fo:text-indent="0cm" fo:margin-top="0pt" fo:margin-bottom="0pt" fo:border="none"/>
      <style:text-properties/>
    </style:style>
    <style:style style:family="text" style:name="T675">
      <style:text-properties fo:color="#1f1f1f" fo:font-family="Arial" style:font-family-asian="Arial" style:font-family-complex="Arial" fo:font-size="12pt"/>
    </style:style>
    <style:style style:family="paragraph" style:name="P298">
      <style:paragraph-properties fo:line-height="115%" fo:margin-left="0cm" fo:margin-right="0cm" fo:text-indent="0cm" fo:margin-top="0pt" fo:margin-bottom="0pt" fo:border="none"/>
      <style:text-properties/>
    </style:style>
    <style:style style:family="text" style:name="T676">
      <style:text-properties fo:color="#1f1f1f" fo:font-family="Arial" style:font-family-asian="Arial" style:font-family-complex="Arial" fo:font-size="12pt"/>
    </style:style>
    <style:style style:family="paragraph" style:name="P299">
      <style:paragraph-properties fo:line-height="115%" fo:margin-left="0cm" fo:margin-right="0cm" fo:text-indent="0cm" fo:margin-top="0pt" fo:margin-bottom="0pt" fo:border="none"/>
      <style:text-properties/>
    </style:style>
    <style:style style:family="text" style:name="T677">
      <style:text-properties fo:color="#1f1f1f" fo:font-family="Arial" style:font-family-asian="Arial" style:font-family-complex="Arial" fo:font-size="12pt"/>
    </style:style>
    <style:style style:family="paragraph" style:name="P300">
      <style:paragraph-properties fo:line-height="115%" fo:margin-left="0cm" fo:margin-right="0cm" fo:text-indent="0cm" fo:margin-top="0pt" fo:margin-bottom="0pt" fo:border="none"/>
      <style:text-properties/>
    </style:style>
    <style:style style:family="text" style:name="T678">
      <style:text-properties fo:color="#1f1f1f" fo:font-family="Arial" style:font-family-asian="Arial" style:font-family-complex="Arial" fo:font-size="12pt"/>
    </style:style>
    <style:style style:parent-style-name="141" style:family="paragraph" style:name="P30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79">
      <style:text-properties fo:color="#1f1f1f" fo:font-family="Arial" style:font-family-asian="Arial" style:font-family-complex="Arial" fo:font-size="14pt" fo:font-weight="bold"/>
    </style:style>
    <style:style style:parent-style-name="668" style:list-style-name="WWNum16" style:family="paragraph" style:name="P302">
      <style:paragraph-properties fo:line-height="115%" fo:margin-right="0cm" fo:margin-top="0pt" fo:margin-bottom="0pt" fo:border="none"/>
      <style:text-properties/>
    </style:style>
    <style:style style:family="text" style:name="T680">
      <style:text-properties fo:color="#1f1f1f" fo:font-family="Arial" style:font-family-asian="Arial" style:font-family-complex="Arial" fo:font-size="12pt"/>
    </style:style>
    <style:style style:parent-style-name="668" style:list-style-name="WWNum16" style:family="paragraph" style:name="P303">
      <style:paragraph-properties fo:line-height="115%" fo:margin-right="0cm" fo:margin-top="0pt" fo:margin-bottom="0pt" fo:border="none"/>
      <style:text-properties/>
    </style:style>
    <style:style style:family="text" style:name="T681">
      <style:text-properties fo:color="#1f1f1f" fo:font-family="Arial" style:font-family-asian="Arial" style:font-family-complex="Arial" fo:font-size="12pt"/>
    </style:style>
    <style:style style:parent-style-name="668" style:list-style-name="WWNum16" style:family="paragraph" style:name="P304">
      <style:paragraph-properties fo:line-height="115%" fo:margin-right="0cm" fo:margin-top="0pt" fo:margin-bottom="0pt" fo:border="none"/>
      <style:text-properties/>
    </style:style>
    <style:style style:family="text" style:name="T682">
      <style:text-properties fo:color="#1f1f1f" fo:font-family="Arial" style:font-family-asian="Arial" style:font-family-complex="Arial" fo:font-size="12pt"/>
    </style:style>
    <style:style style:parent-style-name="668" style:list-style-name="WWNum16" style:family="paragraph" style:name="P305">
      <style:paragraph-properties fo:line-height="115%" fo:margin-right="0cm" fo:margin-top="0pt" fo:margin-bottom="0pt" fo:border="none"/>
      <style:text-properties/>
    </style:style>
    <style:style style:family="text" style:name="T683">
      <style:text-properties fo:color="#1f1f1f" fo:font-family="Arial" style:font-family-asian="Arial" style:font-family-complex="Arial" fo:font-size="12pt"/>
    </style:style>
    <style:style style:family="paragraph" style:name="P306">
      <style:paragraph-properties/>
      <style:text-properties fo:font-family="Arial" style:font-family-asian="Arial" style:font-family-complex="Arial" fo:font-size="12pt" style:font-size-complex="12pt"/>
    </style:style>
    <style:style style:family="text" style:name="T684">
      <style:text-properties/>
    </style:style>
    <style:style style:family="text" style:name="T685">
      <style:text-properties/>
    </style:style>
    <style:style style:family="text" style:name="T686">
      <style:text-properties/>
    </style:style>
    <style:style style:family="paragraph" style:name="P307">
      <style:paragraph-properties fo:line-height="115%" fo:margin-left="0cm" fo:margin-right="0cm" fo:text-indent="0cm" fo:margin-top="0pt" fo:margin-bottom="0pt" fo:break-before="page" fo:border="none"/>
      <style:text-properties/>
    </style:style>
    <style:style style:family="text" style:name="T687">
      <style:text-properties fo:color="#1f1f1f" fo:font-family="Arial" style:font-family-asian="Arial" style:font-family-complex="Arial" fo:font-size="12pt"/>
    </style:style>
    <style:style style:parent-style-name="141" style:family="paragraph" style:name="P30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88">
      <style:text-properties fo:color="#1f1f1f" fo:font-family="Arial" style:font-family-asian="Arial" style:font-family-complex="Arial" fo:font-size="14pt" fo:font-weight="bold"/>
    </style:style>
    <style:style style:family="paragraph" style:name="P309">
      <style:paragraph-properties fo:line-height="115%" fo:margin-left="0cm" fo:margin-right="0cm" fo:text-indent="0cm" fo:margin-top="0pt" fo:margin-bottom="0pt" fo:border="none"/>
      <style:text-properties/>
    </style:style>
    <style:style style:family="text" style:name="T689">
      <style:text-properties fo:color="#1f1f1f" fo:font-family="Arial" style:font-family-asian="Arial" style:font-family-complex="Arial" fo:font-size="12pt"/>
    </style:style>
    <style:style style:parent-style-name="142" style:family="paragraph" style:name="P31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90">
      <style:text-properties fo:color="#1f1f1f" fo:font-family="Arial" style:font-family-asian="Arial" style:font-family-complex="Arial" fo:font-size="12pt" fo:font-weight="bold"/>
    </style:style>
    <style:style style:family="paragraph" style:name="P311">
      <style:paragraph-properties fo:line-height="115%" fo:margin-left="0cm" fo:margin-right="0cm" fo:text-indent="0cm" fo:margin-top="0pt" fo:margin-bottom="0pt" fo:border="none"/>
      <style:text-properties/>
    </style:style>
    <style:style style:family="text" style:name="T691">
      <style:text-properties fo:color="#1f1f1f" fo:font-family="Arial" style:font-family-asian="Arial" style:font-family-complex="Arial" fo:font-size="12pt"/>
    </style:style>
    <style:style style:parent-style-name="142" style:family="paragraph" style:name="P31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92">
      <style:text-properties fo:color="#1f1f1f" fo:font-family="Arial" style:font-family-asian="Arial" style:font-family-complex="Arial" fo:font-size="12pt" fo:font-weight="bold"/>
    </style:style>
    <style:style style:family="paragraph" style:name="P313">
      <style:paragraph-properties fo:line-height="115%" fo:margin-left="0cm" fo:margin-right="0cm" fo:text-indent="0cm" fo:margin-top="0pt" fo:margin-bottom="0pt" fo:border="none"/>
      <style:text-properties/>
    </style:style>
    <style:style style:family="text" style:name="T693">
      <style:text-properties fo:color="#1f1f1f" fo:font-family="Arial" style:font-family-asian="Arial" style:font-family-complex="Arial" fo:font-size="12pt"/>
    </style:style>
    <style:style style:parent-style-name="668" style:list-style-name="WWNum17" style:family="paragraph" style:name="P314">
      <style:paragraph-properties fo:line-height="115%" fo:margin-right="0cm" fo:margin-top="0pt" fo:margin-bottom="0pt" fo:border="none"/>
      <style:text-properties/>
    </style:style>
    <style:style style:family="text" style:name="T694">
      <style:text-properties fo:color="#1f1f1f" fo:font-family="Arial" style:font-family-asian="Arial" style:font-family-complex="Arial" fo:font-size="12pt"/>
    </style:style>
    <style:style style:parent-style-name="668" style:list-style-name="WWNum17" style:family="paragraph" style:name="P315">
      <style:paragraph-properties fo:line-height="115%" fo:margin-right="0cm" fo:margin-top="0pt" fo:margin-bottom="0pt" fo:border="none"/>
      <style:text-properties/>
    </style:style>
    <style:style style:family="text" style:name="T695">
      <style:text-properties fo:color="#1f1f1f" fo:font-family="Arial" style:font-family-asian="Arial" style:font-family-complex="Arial" fo:font-size="12pt"/>
    </style:style>
    <style:style style:family="paragraph" style:name="P316">
      <style:paragraph-properties fo:line-height="115%" fo:margin-left="0cm" fo:margin-right="0cm" fo:text-indent="0cm" fo:margin-top="0pt" fo:margin-bottom="0pt" fo:border="none"/>
      <style:text-properties/>
    </style:style>
    <style:style style:family="text" style:name="T696">
      <style:text-properties fo:color="#1f1f1f" fo:font-family="Arial" style:font-family-asian="Arial" style:font-family-complex="Arial" fo:font-size="12pt"/>
    </style:style>
    <style:style style:parent-style-name="142" style:family="paragraph" style:name="P31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97">
      <style:text-properties fo:color="#1f1f1f" fo:font-family="Arial" style:font-family-asian="Arial" style:font-family-complex="Arial" fo:font-size="12pt" fo:font-weight="bold"/>
    </style:style>
    <style:style style:family="paragraph" style:name="P318">
      <style:paragraph-properties fo:line-height="115%" fo:margin-left="0cm" fo:margin-right="0cm" fo:text-indent="0cm" fo:margin-top="0pt" fo:margin-bottom="0pt" fo:border="none"/>
      <style:text-properties/>
    </style:style>
    <style:style style:family="text" style:name="T698">
      <style:text-properties fo:color="#1f1f1f" fo:font-family="Arial" style:font-family-asian="Arial" style:font-family-complex="Arial" fo:font-size="12pt"/>
    </style:style>
    <style:style style:family="table" style:name="ta3">
      <style:paragraph-properties fo:line-height="100%" fo:margin-bottom="0pt"/>
      <style:table-properties style:width="6.199cm" fo:margin-left="0cm" table:align="left" style:use-optimal-column-width="true"/>
    </style:style>
    <style:style style:family="table-column" style:name="co6">
      <style:table-column-properties style:column-width="1.237cm" style:use-optimal-column-width="true"/>
    </style:style>
    <style:style style:family="table-column" style:name="co7">
      <style:table-column-properties style:column-width="4.962cm" style:use-optimal-column-width="true"/>
    </style:style>
    <style:style style:family="table-row" style:name="ro9">
      <style:table-row-properties/>
    </style:style>
    <style:style style:family="table-cell" style:name="ce2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19">
      <style:paragraph-properties style:line-height-at-least="12pt" fo:margin-top="0pt" fo:margin-bottom="0pt"/>
      <style:text-properties/>
    </style:style>
    <style:style style:family="text" style:name="T699">
      <style:text-properties fo:color="#1f1f1f" fo:font-family="Arial" style:font-family-asian="Arial" style:font-family-complex="Arial" fo:font-size="12pt" fo:font-weight="bold"/>
    </style:style>
    <style:style style:family="table-cell" style:name="ce2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20">
      <style:paragraph-properties style:line-height-at-least="12pt" fo:margin-top="0pt" fo:margin-bottom="0pt"/>
      <style:text-properties/>
    </style:style>
    <style:style style:family="text" style:name="T700">
      <style:text-properties fo:color="#1f1f1f" fo:font-family="Arial" style:font-family-asian="Arial" style:font-family-complex="Arial" fo:font-size="12pt" fo:font-weight="bold"/>
    </style:style>
    <style:style style:family="table-row" style:name="ro10">
      <style:table-row-properties/>
    </style:style>
    <style:style style:family="table-cell" style:name="ce2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21">
      <style:paragraph-properties style:line-height-at-least="12pt" fo:margin-top="0pt" fo:margin-bottom="0pt"/>
      <style:text-properties/>
    </style:style>
    <style:style style:family="text" style:name="T701">
      <style:text-properties fo:color="#1f1f1f" fo:font-family="Arial" style:font-family-asian="Arial" style:font-family-complex="Arial" fo:font-size="12pt"/>
    </style:style>
    <style:style style:family="table-cell" style:name="ce2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22">
      <style:paragraph-properties style:line-height-at-least="12pt" fo:margin-top="0pt" fo:margin-bottom="0pt"/>
      <style:text-properties/>
    </style:style>
    <style:style style:family="text" style:name="T702">
      <style:text-properties fo:color="#1f1f1f" fo:font-family="Arial" style:font-family-asian="Arial" style:font-family-complex="Arial" fo:font-size="12pt"/>
    </style:style>
    <style:style style:family="table-row" style:name="ro11">
      <style:table-row-properties/>
    </style:style>
    <style:style style:family="table-cell" style:name="ce2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23">
      <style:paragraph-properties style:line-height-at-least="12pt" fo:margin-top="0pt" fo:margin-bottom="0pt"/>
      <style:text-properties/>
    </style:style>
    <style:style style:family="text" style:name="T703">
      <style:text-properties fo:color="#1f1f1f" fo:font-family="Arial" style:font-family-asian="Arial" style:font-family-complex="Arial" fo:font-size="12pt"/>
    </style:style>
    <style:style style:family="table-cell" style:name="ce2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24">
      <style:paragraph-properties style:line-height-at-least="12pt" fo:margin-top="0pt" fo:margin-bottom="0pt"/>
      <style:text-properties/>
    </style:style>
    <style:style style:family="text" style:name="T704">
      <style:text-properties fo:color="#1f1f1f" fo:font-family="Arial" style:font-family-asian="Arial" style:font-family-complex="Arial" fo:font-size="12pt"/>
    </style:style>
    <style:style style:family="table-row" style:name="ro12">
      <style:table-row-properties/>
    </style:style>
    <style:style style:family="table-cell" style:name="ce3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25">
      <style:paragraph-properties style:line-height-at-least="12pt" fo:margin-top="0pt" fo:margin-bottom="0pt"/>
      <style:text-properties/>
    </style:style>
    <style:style style:family="text" style:name="T705">
      <style:text-properties fo:color="#1f1f1f" fo:font-family="Arial" style:font-family-asian="Arial" style:font-family-complex="Arial" fo:font-size="12pt"/>
    </style:style>
    <style:style style:family="table-cell" style:name="ce3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26">
      <style:paragraph-properties style:line-height-at-least="12pt" fo:margin-top="0pt" fo:margin-bottom="0pt"/>
      <style:text-properties/>
    </style:style>
    <style:style style:family="text" style:name="T706">
      <style:text-properties fo:color="#1f1f1f" fo:font-family="Arial" style:font-family-asian="Arial" style:font-family-complex="Arial" fo:font-size="12pt"/>
    </style:style>
    <style:style style:family="paragraph" style:name="P327">
      <style:paragraph-properties fo:line-height="115%" fo:margin-left="0cm" fo:margin-right="0cm" fo:text-indent="0cm" fo:margin-top="0pt" fo:margin-bottom="0pt" fo:border="none"/>
      <style:text-properties/>
    </style:style>
    <style:style style:family="text" style:name="T707">
      <style:text-properties fo:color="#1f1f1f" fo:font-family="Arial" style:font-family-asian="Arial" style:font-family-complex="Arial" fo:font-size="12pt"/>
    </style:style>
    <style:style style:parent-style-name="142" style:family="paragraph" style:name="P32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08">
      <style:text-properties fo:color="#1f1f1f" fo:font-family="Arial" style:font-family-asian="Arial" style:font-family-complex="Arial" fo:font-size="12pt" fo:font-weight="bold"/>
    </style:style>
    <style:style style:family="paragraph" style:name="P329">
      <style:paragraph-properties fo:line-height="115%" fo:margin-left="0cm" fo:margin-right="0cm" fo:text-indent="0cm" fo:margin-top="0pt" fo:margin-bottom="0pt" fo:border="none"/>
      <style:text-properties/>
    </style:style>
    <style:style style:family="text" style:name="T709">
      <style:text-properties fo:color="#1f1f1f" fo:font-family="Arial" style:font-family-asian="Arial" style:font-family-complex="Arial" fo:font-size="12pt"/>
    </style:style>
    <style:style style:parent-style-name="141" style:family="paragraph" style:name="P33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10">
      <style:text-properties fo:color="#1f1f1f" fo:font-family="Arial" style:font-family-asian="Arial" style:font-family-complex="Arial" fo:font-size="14pt" fo:font-weight="bold"/>
    </style:style>
    <style:style style:parent-style-name="668" style:list-style-name="WWNum17" style:family="paragraph" style:name="P331">
      <style:paragraph-properties fo:line-height="115%" fo:margin-right="0cm" fo:margin-top="0pt" fo:margin-bottom="0pt" fo:border="none"/>
      <style:text-properties/>
    </style:style>
    <style:style style:family="text" style:name="T711">
      <style:text-properties fo:color="#1f1f1f" fo:font-family="Arial" style:font-family-asian="Arial" style:font-family-complex="Arial" fo:font-size="12pt"/>
    </style:style>
    <style:style style:parent-style-name="668" style:list-style-name="WWNum17" style:family="paragraph" style:name="P332">
      <style:paragraph-properties fo:line-height="115%" fo:margin-right="0cm" fo:margin-top="0pt" fo:margin-bottom="0pt" fo:border="none"/>
      <style:text-properties/>
    </style:style>
    <style:style style:family="text" style:name="T712">
      <style:text-properties fo:color="#1f1f1f" fo:font-family="Arial" style:font-family-asian="Arial" style:font-family-complex="Arial" fo:font-size="12pt"/>
    </style:style>
    <style:style style:parent-style-name="668" style:list-style-name="WWNum17" style:family="paragraph" style:name="P333">
      <style:paragraph-properties fo:line-height="115%" fo:margin-right="0cm" fo:margin-top="0pt" fo:margin-bottom="0pt" fo:border="none"/>
      <style:text-properties/>
    </style:style>
    <style:style style:family="text" style:name="T713">
      <style:text-properties fo:color="#1f1f1f" fo:font-family="Arial" style:font-family-asian="Arial" style:font-family-complex="Arial" fo:font-size="12pt"/>
    </style:style>
    <style:style style:parent-style-name="668" style:list-style-name="WWNum17" style:family="paragraph" style:name="P334">
      <style:paragraph-properties fo:line-height="115%" fo:margin-right="0cm" fo:margin-top="0pt" fo:margin-bottom="0pt" fo:border="none"/>
      <style:text-properties/>
    </style:style>
    <style:style style:family="text" style:name="T714">
      <style:text-properties fo:color="#1f1f1f" fo:font-family="Arial" style:font-family-asian="Arial" style:font-family-complex="Arial" fo:font-size="12pt"/>
    </style:style>
    <style:style style:family="paragraph" style:name="P335">
      <style:paragraph-properties/>
      <style:text-properties fo:font-family="Arial" style:font-family-asian="Arial" style:font-family-complex="Arial" fo:font-size="12pt" style:font-size-complex="12pt"/>
    </style:style>
    <style:style style:family="text" style:name="T715">
      <style:text-properties/>
    </style:style>
    <style:style style:family="text" style:name="T716">
      <style:text-properties/>
    </style:style>
    <style:style style:family="text" style:name="T717">
      <style:text-properties/>
    </style:style>
    <style:style style:family="paragraph" style:name="P336">
      <style:paragraph-properties fo:line-height="115%" fo:margin-left="0cm" fo:margin-right="0cm" fo:text-indent="0cm" fo:margin-top="0pt" fo:margin-bottom="0pt" fo:break-before="page" fo:border="none"/>
      <style:text-properties/>
    </style:style>
    <style:style style:family="text" style:name="T718">
      <style:text-properties fo:color="#1f1f1f" fo:font-family="Arial" style:font-family-asian="Arial" style:font-family-complex="Arial" fo:font-size="12pt"/>
    </style:style>
    <style:style style:parent-style-name="141" style:family="paragraph" style:name="P33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19">
      <style:text-properties fo:color="#1f1f1f" fo:font-family="Arial" style:font-family-asian="Arial" style:font-family-complex="Arial" fo:font-size="14pt" fo:font-weight="bold"/>
    </style:style>
    <style:style style:family="paragraph" style:name="P338">
      <style:paragraph-properties fo:line-height="115%" fo:margin-left="0cm" fo:margin-right="0cm" fo:text-indent="0cm" fo:margin-top="0pt" fo:margin-bottom="0pt" fo:border="none"/>
      <style:text-properties/>
    </style:style>
    <style:style style:family="text" style:name="T720">
      <style:text-properties fo:color="#1f1f1f" fo:font-family="Arial" style:font-family-asian="Arial" style:font-family-complex="Arial" fo:font-size="12pt"/>
    </style:style>
    <style:style style:parent-style-name="142" style:family="paragraph" style:name="P33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21">
      <style:text-properties fo:color="#1f1f1f" fo:font-family="Arial" style:font-family-asian="Arial" style:font-family-complex="Arial" fo:font-size="12pt" fo:font-weight="bold"/>
    </style:style>
    <style:style style:family="paragraph" style:name="P340">
      <style:paragraph-properties fo:line-height="115%" fo:margin-left="0cm" fo:margin-right="0cm" fo:text-indent="0cm" fo:margin-top="0pt" fo:margin-bottom="0pt" fo:border="none"/>
      <style:text-properties/>
    </style:style>
    <style:style style:family="text" style:name="T722">
      <style:text-properties fo:color="#1f1f1f" fo:font-family="Arial" style:font-family-asian="Arial" style:font-family-complex="Arial" fo:font-size="12pt"/>
    </style:style>
    <style:style style:parent-style-name="142" style:family="paragraph" style:name="P34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23">
      <style:text-properties fo:color="#1f1f1f" fo:font-family="Arial" style:font-family-asian="Arial" style:font-family-complex="Arial" fo:font-size="12pt" fo:font-weight="bold"/>
    </style:style>
    <style:style style:family="paragraph" style:name="P342">
      <style:paragraph-properties fo:line-height="115%" fo:margin-left="0cm" fo:margin-right="0cm" fo:text-indent="0cm" fo:margin-top="0pt" fo:margin-bottom="0pt" fo:border="none"/>
      <style:text-properties/>
    </style:style>
    <style:style style:family="text" style:name="T724">
      <style:text-properties fo:color="#1f1f1f" fo:font-family="Arial" style:font-family-asian="Arial" style:font-family-complex="Arial" fo:font-size="12pt"/>
    </style:style>
    <style:style style:parent-style-name="142" style:family="paragraph" style:name="P34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25">
      <style:text-properties fo:color="#1f1f1f" fo:font-family="Arial" style:font-family-asian="Arial" style:font-family-complex="Arial" fo:font-size="12pt" fo:font-weight="bold"/>
    </style:style>
    <style:style style:family="paragraph" style:name="P344">
      <style:paragraph-properties fo:line-height="115%" fo:margin-left="0cm" fo:margin-right="0cm" fo:text-indent="0cm" fo:margin-top="0pt" fo:margin-bottom="0pt" fo:border="none"/>
      <style:text-properties/>
    </style:style>
    <style:style style:family="text" style:name="T726">
      <style:text-properties fo:color="#1f1f1f" fo:font-family="Arial" style:font-family-asian="Arial" style:font-family-complex="Arial" fo:font-size="12pt"/>
    </style:style>
    <style:style style:parent-style-name="142" style:family="paragraph" style:name="P34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27">
      <style:text-properties fo:color="#1f1f1f" fo:font-family="Arial" style:font-family-asian="Arial" style:font-family-complex="Arial" fo:font-size="12pt" fo:font-weight="bold"/>
    </style:style>
    <style:style style:family="paragraph" style:name="P346">
      <style:paragraph-properties fo:line-height="115%" fo:margin-left="0cm" fo:margin-right="0cm" fo:text-indent="0cm" fo:margin-top="0pt" fo:margin-bottom="0pt" fo:border="none"/>
      <style:text-properties/>
    </style:style>
    <style:style style:family="text" style:name="T728">
      <style:text-properties fo:color="#1f1f1f" fo:font-family="Arial" style:font-family-asian="Arial" style:font-family-complex="Arial" fo:font-size="12pt"/>
    </style:style>
    <style:style style:parent-style-name="141" style:family="paragraph" style:name="P34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29">
      <style:text-properties fo:color="#1f1f1f" fo:font-family="Arial" style:font-family-asian="Arial" style:font-family-complex="Arial" fo:font-size="14pt" fo:font-weight="bold"/>
    </style:style>
    <style:style style:parent-style-name="668" style:list-style-name="WWNum18" style:family="paragraph" style:name="P348">
      <style:paragraph-properties fo:line-height="115%" fo:margin-right="0cm" fo:margin-top="0pt" fo:margin-bottom="0pt" fo:border="none"/>
      <style:text-properties/>
    </style:style>
    <style:style style:family="text" style:name="T730">
      <style:text-properties fo:color="#1f1f1f" fo:font-family="Arial" style:font-family-asian="Arial" style:font-family-complex="Arial" fo:font-size="12pt"/>
    </style:style>
    <style:style style:parent-style-name="668" style:list-style-name="WWNum18" style:family="paragraph" style:name="P349">
      <style:paragraph-properties fo:line-height="115%" fo:margin-right="0cm" fo:margin-top="0pt" fo:margin-bottom="0pt" fo:border="none"/>
      <style:text-properties/>
    </style:style>
    <style:style style:family="text" style:name="T731">
      <style:text-properties fo:color="#1f1f1f" fo:font-family="Arial" style:font-family-asian="Arial" style:font-family-complex="Arial" fo:font-size="12pt"/>
    </style:style>
    <style:style style:parent-style-name="668" style:list-style-name="WWNum18" style:family="paragraph" style:name="P350">
      <style:paragraph-properties fo:line-height="115%" fo:margin-right="0cm" fo:margin-top="0pt" fo:margin-bottom="0pt" fo:border="none"/>
      <style:text-properties/>
    </style:style>
    <style:style style:family="text" style:name="T732">
      <style:text-properties fo:color="#1f1f1f" fo:font-family="Arial" style:font-family-asian="Arial" style:font-family-complex="Arial" fo:font-size="12pt"/>
    </style:style>
    <style:style style:parent-style-name="668" style:list-style-name="WWNum18" style:family="paragraph" style:name="P351">
      <style:paragraph-properties fo:line-height="115%" fo:margin-right="0cm" fo:margin-top="0pt" fo:margin-bottom="0pt" fo:border="none"/>
      <style:text-properties/>
    </style:style>
    <style:style style:family="text" style:name="T733">
      <style:text-properties fo:color="#1f1f1f" fo:font-family="Arial" style:font-family-asian="Arial" style:font-family-complex="Arial" fo:font-size="12pt"/>
    </style:style>
    <style:style style:family="paragraph" style:name="P352">
      <style:paragraph-properties/>
      <style:text-properties fo:font-family="Arial" style:font-family-asian="Arial" style:font-family-complex="Arial" fo:font-size="12pt" style:font-size-complex="12pt"/>
    </style:style>
    <style:style style:family="text" style:name="T734">
      <style:text-properties/>
    </style:style>
    <style:style style:family="text" style:name="T735">
      <style:text-properties/>
    </style:style>
    <style:style style:family="text" style:name="T736">
      <style:text-properties/>
    </style:style>
    <style:style style:family="paragraph" style:name="P353">
      <style:paragraph-properties fo:line-height="115%" fo:margin-left="0cm" fo:margin-right="0cm" fo:text-indent="0cm" fo:margin-top="0pt" fo:margin-bottom="0pt" fo:break-before="page" fo:border="none"/>
      <style:text-properties/>
    </style:style>
    <style:style style:family="text" style:name="T737">
      <style:text-properties fo:color="#1f1f1f" fo:font-family="Arial" style:font-family-asian="Arial" style:font-family-complex="Arial" fo:font-size="12pt"/>
    </style:style>
    <style:style style:parent-style-name="141" style:family="paragraph" style:name="P35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38">
      <style:text-properties fo:color="#1f1f1f" fo:font-family="Arial" style:font-family-asian="Arial" style:font-family-complex="Arial" fo:font-size="14pt" fo:font-weight="bold"/>
    </style:style>
    <style:style style:family="paragraph" style:name="P355">
      <style:paragraph-properties fo:line-height="115%" fo:margin-left="0cm" fo:margin-right="0cm" fo:text-indent="0cm" fo:margin-top="0pt" fo:margin-bottom="0pt" fo:border="none"/>
      <style:text-properties/>
    </style:style>
    <style:style style:family="text" style:name="T739">
      <style:text-properties fo:color="#1f1f1f" fo:font-family="Arial" style:font-family-asian="Arial" style:font-family-complex="Arial" fo:font-size="12pt"/>
    </style:style>
    <style:style style:parent-style-name="142" style:family="paragraph" style:name="P35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40">
      <style:text-properties fo:color="#1f1f1f" fo:font-family="Arial" style:font-family-asian="Arial" style:font-family-complex="Arial" fo:font-size="12pt" fo:font-weight="bold"/>
    </style:style>
    <style:style style:family="paragraph" style:name="P357">
      <style:paragraph-properties fo:line-height="115%" fo:margin-left="0cm" fo:margin-right="0cm" fo:text-indent="0cm" fo:margin-top="0pt" fo:margin-bottom="0pt" fo:border="none"/>
      <style:text-properties/>
    </style:style>
    <style:style style:family="text" style:name="T741">
      <style:text-properties fo:color="#1f1f1f" fo:font-family="Arial" style:font-family-asian="Arial" style:font-family-complex="Arial" fo:font-size="12pt"/>
    </style:style>
    <style:style style:family="text" style:name="T742">
      <style:text-properties fo:color="#1f1f1f" fo:font-family="Arial" style:font-family-asian="Arial" style:font-family-complex="Arial" fo:font-size="12pt"/>
    </style:style>
    <style:style style:parent-style-name="142" style:family="paragraph" style:name="P35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43">
      <style:text-properties fo:color="#1f1f1f" fo:font-family="Arial" style:font-family-asian="Arial" style:font-family-complex="Arial" fo:font-size="12pt" fo:font-weight="bold"/>
    </style:style>
    <style:style style:family="paragraph" style:name="P359">
      <style:paragraph-properties fo:line-height="115%" fo:margin-left="0cm" fo:margin-right="0cm" fo:text-indent="0cm" fo:margin-top="0pt" fo:margin-bottom="0pt" fo:border="none"/>
      <style:text-properties/>
    </style:style>
    <style:style style:family="text" style:name="T744">
      <style:text-properties fo:color="#1f1f1f" fo:font-family="Arial" style:font-family-asian="Arial" style:font-family-complex="Arial" fo:font-size="12pt"/>
    </style:style>
    <style:style style:family="text" style:name="T745">
      <style:text-properties fo:color="#1f1f1f" fo:font-family="Arial" style:font-family-asian="Arial" style:font-family-complex="Arial" fo:font-size="12pt"/>
    </style:style>
    <style:style style:parent-style-name="142" style:family="paragraph" style:name="P36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46">
      <style:text-properties fo:color="#1f1f1f" fo:font-family="Arial" style:font-family-asian="Arial" style:font-family-complex="Arial" fo:font-size="12pt" fo:font-weight="bold"/>
    </style:style>
    <style:style style:family="paragraph" style:name="P361">
      <style:paragraph-properties fo:line-height="115%" fo:margin-left="0cm" fo:margin-right="0cm" fo:text-indent="0cm" fo:margin-top="0pt" fo:margin-bottom="0pt" fo:border="none"/>
      <style:text-properties/>
    </style:style>
    <style:style style:family="text" style:name="T747">
      <style:text-properties fo:color="#1f1f1f" fo:font-family="Arial" style:font-family-asian="Arial" style:font-family-complex="Arial" fo:font-size="12pt"/>
    </style:style>
    <style:style style:family="text" style:name="T748">
      <style:text-properties fo:color="#1f1f1f" fo:font-family="Arial" style:font-family-asian="Arial" style:font-family-complex="Arial" fo:font-size="12pt"/>
    </style:style>
    <style:style style:parent-style-name="142" style:family="paragraph" style:name="P36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49">
      <style:text-properties fo:color="#1f1f1f" fo:font-family="Arial" style:font-family-asian="Arial" style:font-family-complex="Arial" fo:font-size="12pt" fo:font-weight="bold"/>
    </style:style>
    <style:style style:family="paragraph" style:name="P363">
      <style:paragraph-properties fo:line-height="115%" fo:margin-left="0cm" fo:margin-right="0cm" fo:text-indent="0cm" fo:margin-top="0pt" fo:margin-bottom="0pt" fo:border="none"/>
      <style:text-properties/>
    </style:style>
    <style:style style:family="text" style:name="T750">
      <style:text-properties fo:color="#1f1f1f" fo:font-family="Arial" style:font-family-asian="Arial" style:font-family-complex="Arial" fo:font-size="12pt"/>
    </style:style>
    <style:style style:parent-style-name="141" style:family="paragraph" style:name="P36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51">
      <style:text-properties fo:color="#1f1f1f" fo:font-family="Arial" style:font-family-asian="Arial" style:font-family-complex="Arial" fo:font-size="14pt" fo:font-weight="bold"/>
    </style:style>
    <style:style style:parent-style-name="668" style:list-style-name="WWNum19" style:family="paragraph" style:name="P365">
      <style:paragraph-properties fo:line-height="115%" fo:margin-right="0cm" fo:margin-top="0pt" fo:margin-bottom="0pt" fo:border="none"/>
      <style:text-properties/>
    </style:style>
    <style:style style:family="text" style:name="T752">
      <style:text-properties fo:color="#1f1f1f" fo:font-family="Arial" style:font-family-asian="Arial" style:font-family-complex="Arial" fo:font-size="12pt"/>
    </style:style>
    <style:style style:parent-style-name="668" style:list-style-name="WWNum19" style:family="paragraph" style:name="P366">
      <style:paragraph-properties fo:line-height="115%" fo:margin-right="0cm" fo:margin-top="0pt" fo:margin-bottom="0pt" fo:border="none"/>
      <style:text-properties/>
    </style:style>
    <style:style style:family="text" style:name="T753">
      <style:text-properties fo:color="#1f1f1f" fo:font-family="Arial" style:font-family-asian="Arial" style:font-family-complex="Arial" fo:font-size="12pt"/>
    </style:style>
    <style:style style:parent-style-name="668" style:list-style-name="WWNum19" style:family="paragraph" style:name="P367">
      <style:paragraph-properties fo:line-height="115%" fo:margin-right="0cm" fo:margin-top="0pt" fo:margin-bottom="0pt" fo:border="none"/>
      <style:text-properties/>
    </style:style>
    <style:style style:family="text" style:name="T754">
      <style:text-properties fo:color="#1f1f1f" fo:font-family="Arial" style:font-family-asian="Arial" style:font-family-complex="Arial" fo:font-size="12pt"/>
    </style:style>
    <style:style style:parent-style-name="668" style:list-style-name="WWNum19" style:family="paragraph" style:name="P368">
      <style:paragraph-properties fo:line-height="115%" fo:margin-right="0cm" fo:margin-top="0pt" fo:margin-bottom="0pt" fo:border="none"/>
      <style:text-properties/>
    </style:style>
    <style:style style:family="text" style:name="T755">
      <style:text-properties fo:color="#1f1f1f" fo:font-family="Arial" style:font-family-asian="Arial" style:font-family-complex="Arial" fo:font-size="12pt"/>
    </style:style>
    <style:style style:family="paragraph" style:name="P369">
      <style:paragraph-properties/>
      <style:text-properties fo:font-family="Arial" style:font-family-asian="Arial" style:font-family-complex="Arial" fo:font-size="12pt" style:font-size-complex="12pt"/>
    </style:style>
    <style:style style:family="text" style:name="T756">
      <style:text-properties/>
    </style:style>
    <style:style style:family="text" style:name="T757">
      <style:text-properties/>
    </style:style>
    <style:style style:family="text" style:name="T758">
      <style:text-properties/>
    </style:style>
    <style:style style:family="paragraph" style:name="P370">
      <style:paragraph-properties fo:line-height="115%" fo:margin-left="0cm" fo:margin-right="0cm" fo:text-indent="0cm" fo:margin-top="0pt" fo:margin-bottom="0pt" fo:break-before="page" fo:border="none"/>
      <style:text-properties/>
    </style:style>
    <style:style style:family="text" style:name="T759">
      <style:text-properties fo:color="#1f1f1f" fo:font-family="Arial" style:font-family-asian="Arial" style:font-family-complex="Arial" fo:font-size="12pt"/>
    </style:style>
    <style:style style:parent-style-name="141" style:family="paragraph" style:name="P37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60">
      <style:text-properties fo:color="#1f1f1f" fo:font-family="Arial" style:font-family-asian="Arial" style:font-family-complex="Arial" fo:font-size="14pt" fo:font-weight="bold"/>
    </style:style>
    <style:style style:family="paragraph" style:name="P372">
      <style:paragraph-properties fo:line-height="115%" fo:margin-left="0cm" fo:margin-right="0cm" fo:text-indent="0cm" fo:margin-top="0pt" fo:margin-bottom="0pt" fo:border="none"/>
      <style:text-properties/>
    </style:style>
    <style:style style:family="text" style:name="T761">
      <style:text-properties fo:color="#1f1f1f" fo:font-family="Arial" style:font-family-asian="Arial" style:font-family-complex="Arial" fo:font-size="12pt"/>
    </style:style>
    <style:style style:parent-style-name="142" style:family="paragraph" style:name="P37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62">
      <style:text-properties fo:color="#1f1f1f" fo:font-family="Arial" style:font-family-asian="Arial" style:font-family-complex="Arial" fo:font-size="12pt" fo:font-weight="bold"/>
    </style:style>
    <style:style style:family="paragraph" style:name="P374">
      <style:paragraph-properties fo:line-height="115%" fo:margin-left="0cm" fo:margin-right="0cm" fo:text-indent="0cm" fo:margin-top="0pt" fo:margin-bottom="0pt" fo:border="none"/>
      <style:text-properties/>
    </style:style>
    <style:style style:family="text" style:name="T763">
      <style:text-properties fo:color="#1f1f1f" fo:font-family="Arial" style:font-family-asian="Arial" style:font-family-complex="Arial" fo:font-size="12pt"/>
    </style:style>
    <style:style style:parent-style-name="142" style:family="paragraph" style:name="P37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64">
      <style:text-properties fo:color="#1f1f1f" fo:font-family="Arial" style:font-family-asian="Arial" style:font-family-complex="Arial" fo:font-size="12pt" fo:font-weight="bold"/>
    </style:style>
    <style:style style:family="paragraph" style:name="P376">
      <style:paragraph-properties fo:line-height="115%" fo:margin-left="0cm" fo:margin-right="0cm" fo:text-indent="0cm" fo:margin-top="0pt" fo:margin-bottom="0pt" fo:border="none"/>
      <style:text-properties/>
    </style:style>
    <style:style style:family="text" style:name="T765">
      <style:text-properties fo:color="#1f1f1f" fo:font-family="Arial" style:font-family-asian="Arial" style:font-family-complex="Arial" fo:font-size="12pt"/>
    </style:style>
    <style:style style:family="table" style:name="ta4">
      <style:paragraph-properties fo:line-height="100%" fo:margin-bottom="0pt"/>
      <style:table-properties style:width="6.869cm" fo:margin-left="0cm" table:align="left" style:use-optimal-column-width="true"/>
    </style:style>
    <style:style style:family="table-column" style:name="co8">
      <style:table-column-properties style:column-width="2.235cm" style:use-optimal-column-width="true"/>
    </style:style>
    <style:style style:family="table-column" style:name="co9">
      <style:table-column-properties style:column-width="4.634cm" style:use-optimal-column-width="true"/>
    </style:style>
    <style:style style:family="table-row" style:name="ro13">
      <style:table-row-properties/>
    </style:style>
    <style:style style:family="table-cell" style:name="ce3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77">
      <style:paragraph-properties style:line-height-at-least="12pt" fo:margin-top="0pt" fo:margin-bottom="0pt"/>
      <style:text-properties/>
    </style:style>
    <style:style style:family="text" style:name="T766">
      <style:text-properties fo:color="#1f1f1f" fo:font-family="Arial" style:font-family-asian="Arial" style:font-family-complex="Arial" fo:font-size="12pt" fo:font-weight="bold"/>
    </style:style>
    <style:style style:family="table-cell" style:name="ce3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78">
      <style:paragraph-properties style:line-height-at-least="12pt" fo:margin-top="0pt" fo:margin-bottom="0pt"/>
      <style:text-properties/>
    </style:style>
    <style:style style:family="text" style:name="T767">
      <style:text-properties fo:color="#1f1f1f" fo:font-family="Arial" style:font-family-asian="Arial" style:font-family-complex="Arial" fo:font-size="12pt" fo:font-weight="bold"/>
    </style:style>
    <style:style style:family="table-row" style:name="ro14">
      <style:table-row-properties/>
    </style:style>
    <style:style style:family="table-cell" style:name="ce3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79">
      <style:paragraph-properties style:line-height-at-least="12pt" fo:margin-top="0pt" fo:margin-bottom="0pt"/>
      <style:text-properties/>
    </style:style>
    <style:style style:family="text" style:name="T768">
      <style:text-properties fo:color="#1f1f1f" fo:font-family="Arial" style:font-family-asian="Arial" style:font-family-complex="Arial" fo:font-size="12pt"/>
    </style:style>
    <style:style style:family="table-cell" style:name="ce3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80">
      <style:paragraph-properties style:line-height-at-least="12pt" fo:margin-top="0pt" fo:margin-bottom="0pt"/>
      <style:text-properties/>
    </style:style>
    <style:style style:family="text" style:name="T769">
      <style:text-properties fo:color="#1f1f1f" fo:font-family="Arial" style:font-family-asian="Arial" style:font-family-complex="Arial" fo:font-size="12pt"/>
    </style:style>
    <style:style style:family="table-row" style:name="ro15">
      <style:table-row-properties/>
    </style:style>
    <style:style style:family="table-cell" style:name="ce3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81">
      <style:paragraph-properties style:line-height-at-least="12pt" fo:margin-top="0pt" fo:margin-bottom="0pt"/>
      <style:text-properties/>
    </style:style>
    <style:style style:family="text" style:name="T770">
      <style:text-properties fo:color="#1f1f1f" fo:font-family="Arial" style:font-family-asian="Arial" style:font-family-complex="Arial" fo:font-size="12pt"/>
    </style:style>
    <style:style style:family="table-cell" style:name="ce3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82">
      <style:paragraph-properties style:line-height-at-least="12pt" fo:margin-top="0pt" fo:margin-bottom="0pt"/>
      <style:text-properties/>
    </style:style>
    <style:style style:family="text" style:name="T771">
      <style:text-properties fo:color="#1f1f1f" fo:font-family="Arial" style:font-family-asian="Arial" style:font-family-complex="Arial" fo:font-size="12pt"/>
    </style:style>
    <style:style style:family="table-row" style:name="ro16">
      <style:table-row-properties/>
    </style:style>
    <style:style style:family="table-cell" style:name="ce3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83">
      <style:paragraph-properties style:line-height-at-least="12pt" fo:margin-top="0pt" fo:margin-bottom="0pt"/>
      <style:text-properties/>
    </style:style>
    <style:style style:family="text" style:name="T772">
      <style:text-properties fo:color="#1f1f1f" fo:font-family="Arial" style:font-family-asian="Arial" style:font-family-complex="Arial" fo:font-size="12pt"/>
    </style:style>
    <style:style style:family="table-cell" style:name="ce4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84">
      <style:paragraph-properties style:line-height-at-least="12pt" fo:margin-top="0pt" fo:margin-bottom="0pt"/>
      <style:text-properties/>
    </style:style>
    <style:style style:family="text" style:name="T773">
      <style:text-properties fo:color="#1f1f1f" fo:font-family="Arial" style:font-family-asian="Arial" style:font-family-complex="Arial" fo:font-size="12pt"/>
    </style:style>
    <style:style style:family="table-row" style:name="ro17">
      <style:table-row-properties/>
    </style:style>
    <style:style style:family="table-cell" style:name="ce4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85">
      <style:paragraph-properties style:line-height-at-least="12pt" fo:margin-top="0pt" fo:margin-bottom="0pt"/>
      <style:text-properties/>
    </style:style>
    <style:style style:family="text" style:name="T774">
      <style:text-properties fo:color="#1f1f1f" fo:font-family="Arial" style:font-family-asian="Arial" style:font-family-complex="Arial" fo:font-size="12pt"/>
    </style:style>
    <style:style style:family="table-cell" style:name="ce4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86">
      <style:paragraph-properties style:line-height-at-least="12pt" fo:margin-top="0pt" fo:margin-bottom="0pt"/>
      <style:text-properties/>
    </style:style>
    <style:style style:family="text" style:name="T775">
      <style:text-properties fo:color="#1f1f1f" fo:font-family="Arial" style:font-family-asian="Arial" style:font-family-complex="Arial" fo:font-size="12pt"/>
    </style:style>
    <style:style style:family="table-row" style:name="ro18">
      <style:table-row-properties/>
    </style:style>
    <style:style style:family="table-cell" style:name="ce4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87">
      <style:paragraph-properties style:line-height-at-least="12pt" fo:margin-top="0pt" fo:margin-bottom="0pt"/>
      <style:text-properties/>
    </style:style>
    <style:style style:family="text" style:name="T776">
      <style:text-properties fo:color="#1f1f1f" fo:font-family="Arial" style:font-family-asian="Arial" style:font-family-complex="Arial" fo:font-size="12pt"/>
    </style:style>
    <style:style style:family="table-cell" style:name="ce4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88">
      <style:paragraph-properties style:line-height-at-least="12pt" fo:margin-top="0pt" fo:margin-bottom="0pt"/>
      <style:text-properties/>
    </style:style>
    <style:style style:family="text" style:name="T777">
      <style:text-properties fo:color="#1f1f1f" fo:font-family="Arial" style:font-family-asian="Arial" style:font-family-complex="Arial" fo:font-size="12pt"/>
    </style:style>
    <style:style style:family="table-row" style:name="ro19">
      <style:table-row-properties/>
    </style:style>
    <style:style style:family="table-cell" style:name="ce4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89">
      <style:paragraph-properties style:line-height-at-least="12pt" fo:margin-top="0pt" fo:margin-bottom="0pt"/>
      <style:text-properties/>
    </style:style>
    <style:style style:family="text" style:name="T778">
      <style:text-properties fo:color="#1f1f1f" fo:font-family="Arial" style:font-family-asian="Arial" style:font-family-complex="Arial" fo:font-size="12pt"/>
    </style:style>
    <style:style style:family="table-cell" style:name="ce4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90">
      <style:paragraph-properties style:line-height-at-least="12pt" fo:margin-top="0pt" fo:margin-bottom="0pt"/>
      <style:text-properties/>
    </style:style>
    <style:style style:family="text" style:name="T779">
      <style:text-properties fo:color="#1f1f1f" fo:font-family="Arial" style:font-family-asian="Arial" style:font-family-complex="Arial" fo:font-size="12pt"/>
    </style:style>
    <style:style style:family="table-row" style:name="ro20">
      <style:table-row-properties/>
    </style:style>
    <style:style style:family="table-cell" style:name="ce4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91">
      <style:paragraph-properties style:line-height-at-least="12pt" fo:margin-top="0pt" fo:margin-bottom="0pt"/>
      <style:text-properties/>
    </style:style>
    <style:style style:family="text" style:name="T780">
      <style:text-properties fo:color="#1f1f1f" fo:font-family="Arial" style:font-family-asian="Arial" style:font-family-complex="Arial" fo:font-size="12pt"/>
    </style:style>
    <style:style style:family="table-cell" style:name="ce4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92">
      <style:paragraph-properties style:line-height-at-least="12pt" fo:margin-top="0pt" fo:margin-bottom="0pt"/>
      <style:text-properties/>
    </style:style>
    <style:style style:family="text" style:name="T781">
      <style:text-properties fo:color="#1f1f1f" fo:font-family="Arial" style:font-family-asian="Arial" style:font-family-complex="Arial" fo:font-size="12pt"/>
    </style:style>
    <style:style style:family="table-row" style:name="ro21">
      <style:table-row-properties/>
    </style:style>
    <style:style style:family="table-cell" style:name="ce4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93">
      <style:paragraph-properties style:line-height-at-least="12pt" fo:margin-top="0pt" fo:margin-bottom="0pt"/>
      <style:text-properties/>
    </style:style>
    <style:style style:family="text" style:name="T782">
      <style:text-properties fo:color="#1f1f1f" fo:font-family="Arial" style:font-family-asian="Arial" style:font-family-complex="Arial" fo:font-size="12pt"/>
    </style:style>
    <style:style style:family="table-cell" style:name="ce5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94">
      <style:paragraph-properties style:line-height-at-least="12pt" fo:margin-top="0pt" fo:margin-bottom="0pt"/>
      <style:text-properties/>
    </style:style>
    <style:style style:family="text" style:name="T783">
      <style:text-properties fo:color="#1f1f1f" fo:font-family="Arial" style:font-family-asian="Arial" style:font-family-complex="Arial" fo:font-size="12pt"/>
    </style:style>
    <style:style style:family="table-row" style:name="ro22">
      <style:table-row-properties/>
    </style:style>
    <style:style style:family="table-cell" style:name="ce5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95">
      <style:paragraph-properties style:line-height-at-least="12pt" fo:margin-top="0pt" fo:margin-bottom="0pt"/>
      <style:text-properties/>
    </style:style>
    <style:style style:family="text" style:name="T784">
      <style:text-properties fo:color="#1f1f1f" fo:font-family="Arial" style:font-family-asian="Arial" style:font-family-complex="Arial" fo:font-size="12pt"/>
    </style:style>
    <style:style style:family="table-cell" style:name="ce5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96">
      <style:paragraph-properties style:line-height-at-least="12pt" fo:margin-top="0pt" fo:margin-bottom="0pt"/>
      <style:text-properties/>
    </style:style>
    <style:style style:family="text" style:name="T785">
      <style:text-properties fo:color="#1f1f1f" fo:font-family="Arial" style:font-family-asian="Arial" style:font-family-complex="Arial" fo:font-size="12pt"/>
    </style:style>
    <style:style style:parent-style-name="142" style:family="paragraph" style:name="P39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86">
      <style:text-properties fo:color="#1f1f1f" fo:font-family="Arial" style:font-family-asian="Arial" style:font-family-complex="Arial" fo:font-size="12pt" fo:font-weight="bold"/>
    </style:style>
    <style:style style:family="paragraph" style:name="P398">
      <style:paragraph-properties fo:line-height="115%" fo:margin-left="0cm" fo:margin-right="0cm" fo:text-indent="0cm" fo:margin-top="0pt" fo:margin-bottom="0pt" fo:border="none"/>
      <style:text-properties/>
    </style:style>
    <style:style style:family="text" style:name="T787">
      <style:text-properties fo:color="#1f1f1f" fo:font-family="Arial" style:font-family-asian="Arial" style:font-family-complex="Arial" fo:font-size="12pt"/>
    </style:style>
    <style:style style:parent-style-name="142" style:family="paragraph" style:name="P39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88">
      <style:text-properties fo:color="#1f1f1f" fo:font-family="Arial" style:font-family-asian="Arial" style:font-family-complex="Arial" fo:font-size="12pt" fo:font-weight="bold"/>
    </style:style>
    <style:style style:family="paragraph" style:name="P400">
      <style:paragraph-properties fo:line-height="115%" fo:margin-left="0cm" fo:margin-right="0cm" fo:text-indent="0cm" fo:margin-top="0pt" fo:margin-bottom="0pt" fo:border="none"/>
      <style:text-properties/>
    </style:style>
    <style:style style:family="text" style:name="T789">
      <style:text-properties fo:color="#1f1f1f" fo:font-family="Arial" style:font-family-asian="Arial" style:font-family-complex="Arial" fo:font-size="12pt"/>
    </style:style>
    <style:style style:parent-style-name="141" style:family="paragraph" style:name="P40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90">
      <style:text-properties fo:color="#1f1f1f" fo:font-family="Arial" style:font-family-asian="Arial" style:font-family-complex="Arial" fo:font-size="14pt" fo:font-weight="bold"/>
    </style:style>
    <style:style style:parent-style-name="668" style:list-style-name="WWNum20" style:family="paragraph" style:name="P402">
      <style:paragraph-properties fo:line-height="115%" fo:margin-right="0cm" fo:margin-top="0pt" fo:margin-bottom="0pt" fo:border="none"/>
      <style:text-properties/>
    </style:style>
    <style:style style:family="text" style:name="T791">
      <style:text-properties fo:color="#1f1f1f" fo:font-family="Arial" style:font-family-asian="Arial" style:font-family-complex="Arial" fo:font-size="12pt"/>
    </style:style>
    <style:style style:parent-style-name="668" style:list-style-name="WWNum20" style:family="paragraph" style:name="P403">
      <style:paragraph-properties fo:line-height="115%" fo:margin-right="0cm" fo:margin-top="0pt" fo:margin-bottom="0pt" fo:border="none"/>
      <style:text-properties/>
    </style:style>
    <style:style style:family="text" style:name="T792">
      <style:text-properties fo:color="#1f1f1f" fo:font-family="Arial" style:font-family-asian="Arial" style:font-family-complex="Arial" fo:font-size="12pt"/>
    </style:style>
    <style:style style:parent-style-name="668" style:list-style-name="WWNum20" style:family="paragraph" style:name="P404">
      <style:paragraph-properties fo:line-height="115%" fo:margin-right="0cm" fo:margin-top="0pt" fo:margin-bottom="0pt" fo:border="none"/>
      <style:text-properties/>
    </style:style>
    <style:style style:family="text" style:name="T793">
      <style:text-properties fo:color="#1f1f1f" fo:font-family="Arial" style:font-family-asian="Arial" style:font-family-complex="Arial" fo:font-size="12pt"/>
    </style:style>
    <style:style style:parent-style-name="668" style:list-style-name="WWNum20" style:family="paragraph" style:name="P405">
      <style:paragraph-properties fo:line-height="115%" fo:margin-right="0cm" fo:margin-top="0pt" fo:margin-bottom="0pt" fo:border="none"/>
      <style:text-properties/>
    </style:style>
    <style:style style:family="text" style:name="T794">
      <style:text-properties fo:color="#1f1f1f" fo:font-family="Arial" style:font-family-asian="Arial" style:font-family-complex="Arial" fo:font-size="12pt"/>
    </style:style>
    <style:style style:family="paragraph" style:name="P406">
      <style:paragraph-properties/>
      <style:text-properties fo:font-family="Arial" style:font-family-asian="Arial" style:font-family-complex="Arial" fo:font-size="12pt" style:font-size-complex="12pt"/>
    </style:style>
    <style:style style:family="text" style:name="T795">
      <style:text-properties/>
    </style:style>
    <style:style style:family="text" style:name="T796">
      <style:text-properties/>
    </style:style>
    <style:style style:family="text" style:name="T797">
      <style:text-properties/>
    </style:style>
    <style:style style:parent-style-name="141" style:family="paragraph" style:name="P407">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798">
      <style:text-properties fo:color="#1f1f1f" fo:font-family="Arial" style:font-family-asian="Arial" style:font-family-complex="Arial" fo:font-size="14pt" fo:font-weight="bold"/>
    </style:style>
    <style:style style:family="paragraph" style:name="P408">
      <style:paragraph-properties fo:line-height="115%" fo:margin-left="0cm" fo:margin-right="0cm" fo:text-indent="0cm" fo:margin-top="0pt" fo:margin-bottom="0pt" fo:border="none"/>
      <style:text-properties/>
    </style:style>
    <style:style style:family="text" style:name="T799">
      <style:text-properties fo:color="#1f1f1f" fo:font-family="Arial" style:font-family-asian="Arial" style:font-family-complex="Arial" fo:font-size="12pt"/>
    </style:style>
    <style:style style:parent-style-name="142" style:family="paragraph" style:name="P40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00">
      <style:text-properties fo:color="#1f1f1f" fo:font-family="Arial" style:font-family-asian="Arial" style:font-family-complex="Arial" fo:font-size="12pt" fo:font-weight="bold"/>
    </style:style>
    <style:style style:family="paragraph" style:name="P410">
      <style:paragraph-properties fo:line-height="115%" fo:margin-left="0cm" fo:margin-right="0cm" fo:text-indent="0cm" fo:margin-top="0pt" fo:margin-bottom="0pt" fo:border="none"/>
      <style:text-properties/>
    </style:style>
    <style:style style:family="text" style:name="T801">
      <style:text-properties fo:color="#1f1f1f" fo:font-family="Arial" style:font-family-asian="Arial" style:font-family-complex="Arial" fo:font-size="12pt"/>
    </style:style>
    <style:style style:parent-style-name="142" style:family="paragraph" style:name="P41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02">
      <style:text-properties fo:color="#1f1f1f" fo:font-family="Arial" style:font-family-asian="Arial" style:font-family-complex="Arial" fo:font-size="12pt" fo:font-weight="bold"/>
    </style:style>
    <style:style style:family="paragraph" style:name="P412">
      <style:paragraph-properties fo:line-height="115%" fo:margin-left="0cm" fo:margin-right="0cm" fo:text-indent="0cm" fo:margin-top="0pt" fo:margin-bottom="0pt" fo:border="none"/>
      <style:text-properties/>
    </style:style>
    <style:style style:family="text" style:name="T803">
      <style:text-properties fo:color="#1f1f1f" fo:font-family="Arial" style:font-family-asian="Arial" style:font-family-complex="Arial" fo:font-size="12pt"/>
    </style:style>
    <style:style style:parent-style-name="142" style:family="paragraph" style:name="P41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04">
      <style:text-properties fo:color="#1f1f1f" fo:font-family="Arial" style:font-family-asian="Arial" style:font-family-complex="Arial" fo:font-size="12pt" fo:font-weight="bold"/>
    </style:style>
    <style:style style:family="paragraph" style:name="P414">
      <style:paragraph-properties fo:line-height="115%" fo:margin-left="0cm" fo:margin-right="0cm" fo:text-indent="0cm" fo:margin-top="0pt" fo:margin-bottom="0pt" fo:border="none"/>
      <style:text-properties/>
    </style:style>
    <style:style style:family="text" style:name="T805">
      <style:text-properties fo:color="#1f1f1f" fo:font-family="Arial" style:font-family-asian="Arial" style:font-family-complex="Arial" fo:font-size="12pt"/>
    </style:style>
    <style:style style:parent-style-name="142" style:family="paragraph" style:name="P41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06">
      <style:text-properties fo:color="#1f1f1f" fo:font-family="Arial" style:font-family-asian="Arial" style:font-family-complex="Arial" fo:font-size="12pt" fo:font-weight="bold"/>
    </style:style>
    <style:style style:family="paragraph" style:name="P416">
      <style:paragraph-properties fo:line-height="115%" fo:margin-left="0cm" fo:margin-right="0cm" fo:text-indent="0cm" fo:margin-top="0pt" fo:margin-bottom="0pt" fo:border="none"/>
      <style:text-properties/>
    </style:style>
    <style:style style:family="text" style:name="T807">
      <style:text-properties fo:color="#1f1f1f" fo:font-family="Arial" style:font-family-asian="Arial" style:font-family-complex="Arial" fo:font-size="12pt"/>
    </style:style>
    <style:style style:parent-style-name="141" style:family="paragraph" style:name="P41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08">
      <style:text-properties fo:color="#1f1f1f" fo:font-family="Arial" style:font-family-asian="Arial" style:font-family-complex="Arial" fo:font-size="14pt" fo:font-weight="bold"/>
    </style:style>
    <style:style style:parent-style-name="668" style:list-style-name="WWNum21" style:family="paragraph" style:name="P418">
      <style:paragraph-properties fo:line-height="115%" fo:margin-right="0cm" fo:margin-top="0pt" fo:margin-bottom="0pt" fo:border="none"/>
      <style:text-properties/>
    </style:style>
    <style:style style:family="text" style:name="T809">
      <style:text-properties fo:color="#1f1f1f" fo:font-family="Arial" style:font-family-asian="Arial" style:font-family-complex="Arial" fo:font-size="12pt"/>
    </style:style>
    <style:style style:parent-style-name="668" style:list-style-name="WWNum21" style:family="paragraph" style:name="P419">
      <style:paragraph-properties fo:line-height="115%" fo:margin-right="0cm" fo:margin-top="0pt" fo:margin-bottom="0pt" fo:border="none"/>
      <style:text-properties/>
    </style:style>
    <style:style style:family="text" style:name="T810">
      <style:text-properties fo:color="#1f1f1f" fo:font-family="Arial" style:font-family-asian="Arial" style:font-family-complex="Arial" fo:font-size="12pt"/>
    </style:style>
    <style:style style:parent-style-name="668" style:list-style-name="WWNum21" style:family="paragraph" style:name="P420">
      <style:paragraph-properties fo:line-height="115%" fo:margin-right="0cm" fo:margin-top="0pt" fo:margin-bottom="0pt" fo:border="none"/>
      <style:text-properties/>
    </style:style>
    <style:style style:family="text" style:name="T811">
      <style:text-properties fo:color="#1f1f1f" fo:font-family="Arial" style:font-family-asian="Arial" style:font-family-complex="Arial" fo:font-size="12pt"/>
    </style:style>
    <style:style style:parent-style-name="668" style:list-style-name="WWNum21" style:family="paragraph" style:name="P421">
      <style:paragraph-properties fo:line-height="115%" fo:margin-right="0cm" fo:margin-top="0pt" fo:margin-bottom="0pt" fo:border="none"/>
      <style:text-properties/>
    </style:style>
    <style:style style:family="text" style:name="T812">
      <style:text-properties fo:color="#1f1f1f" fo:font-family="Arial" style:font-family-asian="Arial" style:font-family-complex="Arial" fo:font-size="12pt"/>
    </style:style>
    <style:style style:family="paragraph" style:name="P422">
      <style:paragraph-properties/>
      <style:text-properties fo:font-family="Arial" style:font-family-asian="Arial" style:font-family-complex="Arial" fo:font-size="12pt" style:font-size-complex="12pt"/>
    </style:style>
    <style:style style:family="text" style:name="T813">
      <style:text-properties/>
    </style:style>
    <style:style style:family="text" style:name="T814">
      <style:text-properties/>
    </style:style>
    <style:style style:family="text" style:name="T815">
      <style:text-properties/>
    </style:style>
    <style:style style:parent-style-name="141" style:family="paragraph" style:name="P42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816">
      <style:text-properties fo:color="#1f1f1f" fo:font-family="Arial" style:font-family-asian="Arial" style:font-family-complex="Arial" fo:font-size="14pt" fo:font-weight="bold"/>
    </style:style>
    <style:style style:family="paragraph" style:name="P424">
      <style:paragraph-properties fo:line-height="115%" fo:margin-left="0cm" fo:margin-right="0cm" fo:text-indent="0cm" fo:margin-top="0pt" fo:margin-bottom="0pt" fo:border="none"/>
      <style:text-properties/>
    </style:style>
    <style:style style:family="text" style:name="T817">
      <style:text-properties fo:color="#1f1f1f" fo:font-family="Arial" style:font-family-asian="Arial" style:font-family-complex="Arial" fo:font-size="12pt"/>
    </style:style>
    <style:style style:parent-style-name="142" style:family="paragraph" style:name="P42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18">
      <style:text-properties fo:color="#1f1f1f" fo:font-family="Arial" style:font-family-asian="Arial" style:font-family-complex="Arial" fo:font-size="12pt" fo:font-weight="bold"/>
    </style:style>
    <style:style style:family="paragraph" style:name="P426">
      <style:paragraph-properties fo:line-height="115%" fo:margin-left="0cm" fo:margin-right="0cm" fo:text-indent="0cm" fo:margin-top="0pt" fo:margin-bottom="0pt" fo:border="none"/>
      <style:text-properties/>
    </style:style>
    <style:style style:family="text" style:name="T819">
      <style:text-properties fo:color="#1f1f1f" fo:font-family="Arial" style:font-family-asian="Arial" style:font-family-complex="Arial" fo:font-size="12pt"/>
    </style:style>
    <style:style style:family="text" style:name="T820">
      <style:text-properties fo:color="#1f1f1f" fo:font-family="Arial" style:font-family-asian="Arial" style:font-family-complex="Arial" fo:font-size="12pt"/>
    </style:style>
    <style:style style:parent-style-name="142" style:family="paragraph" style:name="P42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21">
      <style:text-properties fo:color="#1f1f1f" fo:font-family="Arial" style:font-family-asian="Arial" style:font-family-complex="Arial" fo:font-size="12pt" fo:font-weight="bold"/>
    </style:style>
    <style:style style:family="paragraph" style:name="P428">
      <style:paragraph-properties fo:line-height="115%" fo:margin-left="0cm" fo:margin-right="0cm" fo:text-indent="0cm" fo:margin-top="0pt" fo:margin-bottom="0pt" fo:border="none"/>
      <style:text-properties/>
    </style:style>
    <style:style style:family="text" style:name="T822">
      <style:text-properties fo:color="#1f1f1f" fo:font-family="Arial" style:font-family-asian="Arial" style:font-family-complex="Arial" fo:font-size="12pt"/>
    </style:style>
    <style:style style:family="text" style:name="T823">
      <style:text-properties fo:color="#1f1f1f" fo:font-family="Arial" style:font-family-asian="Arial" style:font-family-complex="Arial" fo:font-size="12pt"/>
    </style:style>
    <style:style style:parent-style-name="142" style:family="paragraph" style:name="P42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24">
      <style:text-properties fo:color="#1f1f1f" fo:font-family="Arial" style:font-family-asian="Arial" style:font-family-complex="Arial" fo:font-size="12pt" fo:font-weight="bold"/>
    </style:style>
    <style:style style:family="paragraph" style:name="P430">
      <style:paragraph-properties fo:line-height="115%" fo:margin-left="0cm" fo:margin-right="0cm" fo:text-indent="0cm" fo:margin-top="0pt" fo:margin-bottom="0pt" fo:border="none"/>
      <style:text-properties/>
    </style:style>
    <style:style style:family="text" style:name="T825">
      <style:text-properties fo:color="#1f1f1f" fo:font-family="Arial" style:font-family-asian="Arial" style:font-family-complex="Arial" fo:font-size="12pt"/>
    </style:style>
    <style:style style:parent-style-name="142" style:family="paragraph" style:name="P43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26">
      <style:text-properties fo:color="#1f1f1f" fo:font-family="Arial" style:font-family-asian="Arial" style:font-family-complex="Arial" fo:font-size="12pt" fo:font-weight="bold"/>
    </style:style>
    <style:style style:family="paragraph" style:name="P432">
      <style:paragraph-properties fo:line-height="115%" fo:margin-left="0cm" fo:margin-right="0cm" fo:text-indent="0cm" fo:margin-top="0pt" fo:margin-bottom="0pt" fo:border="none"/>
      <style:text-properties/>
    </style:style>
    <style:style style:family="text" style:name="T827">
      <style:text-properties fo:color="#1f1f1f" fo:font-family="Arial" style:font-family-asian="Arial" style:font-family-complex="Arial" fo:font-size="12pt"/>
    </style:style>
    <style:style style:parent-style-name="141" style:family="paragraph" style:name="P43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28">
      <style:text-properties fo:color="#1f1f1f" fo:font-family="Arial" style:font-family-asian="Arial" style:font-family-complex="Arial" fo:font-size="14pt" fo:font-weight="bold"/>
    </style:style>
    <style:style style:parent-style-name="668" style:list-style-name="WWNum22" style:family="paragraph" style:name="P434">
      <style:paragraph-properties fo:line-height="115%" fo:margin-right="0cm" fo:margin-top="0pt" fo:margin-bottom="0pt" fo:border="none"/>
      <style:text-properties/>
    </style:style>
    <style:style style:family="text" style:name="T829">
      <style:text-properties fo:color="#1f1f1f" fo:font-family="Arial" style:font-family-asian="Arial" style:font-family-complex="Arial" fo:font-size="12pt"/>
    </style:style>
    <style:style style:parent-style-name="668" style:list-style-name="WWNum22" style:family="paragraph" style:name="P435">
      <style:paragraph-properties fo:line-height="115%" fo:margin-right="0cm" fo:margin-top="0pt" fo:margin-bottom="0pt" fo:border="none"/>
      <style:text-properties/>
    </style:style>
    <style:style style:family="text" style:name="T830">
      <style:text-properties fo:color="#1f1f1f" fo:font-family="Arial" style:font-family-asian="Arial" style:font-family-complex="Arial" fo:font-size="12pt"/>
    </style:style>
    <style:style style:parent-style-name="668" style:list-style-name="WWNum22" style:family="paragraph" style:name="P436">
      <style:paragraph-properties fo:line-height="115%" fo:margin-right="0cm" fo:margin-top="0pt" fo:margin-bottom="0pt" fo:border="none"/>
      <style:text-properties/>
    </style:style>
    <style:style style:family="text" style:name="T831">
      <style:text-properties fo:color="#1f1f1f" fo:font-family="Arial" style:font-family-asian="Arial" style:font-family-complex="Arial" fo:font-size="12pt"/>
    </style:style>
    <style:style style:parent-style-name="668" style:list-style-name="WWNum22" style:family="paragraph" style:name="P437">
      <style:paragraph-properties fo:line-height="115%" fo:margin-right="0cm" fo:margin-top="0pt" fo:margin-bottom="0pt" fo:border="none"/>
      <style:text-properties/>
    </style:style>
    <style:style style:family="text" style:name="T832">
      <style:text-properties fo:color="#1f1f1f" fo:font-family="Arial" style:font-family-asian="Arial" style:font-family-complex="Arial" fo:font-size="12pt"/>
    </style:style>
    <style:style style:family="paragraph" style:name="P438">
      <style:paragraph-properties/>
      <style:text-properties fo:font-family="Arial" style:font-family-asian="Arial" style:font-family-complex="Arial" fo:font-size="12pt" style:font-size-complex="12pt"/>
    </style:style>
    <style:style style:family="text" style:name="T833">
      <style:text-properties/>
    </style:style>
    <style:style style:family="text" style:name="T834">
      <style:text-properties/>
    </style:style>
    <style:style style:family="text" style:name="T835">
      <style:text-properties/>
    </style:style>
    <style:style style:parent-style-name="141" style:family="paragraph" style:name="P439">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836">
      <style:text-properties fo:color="#1f1f1f" fo:font-family="Arial" style:font-family-asian="Arial" style:font-family-complex="Arial" fo:font-size="14pt" fo:font-weight="bold"/>
    </style:style>
    <style:style style:family="paragraph" style:name="P440">
      <style:paragraph-properties fo:line-height="115%" fo:margin-left="0cm" fo:margin-right="0cm" fo:text-indent="0cm" fo:margin-top="0pt" fo:margin-bottom="0pt" fo:border="none"/>
      <style:text-properties/>
    </style:style>
    <style:style style:family="text" style:name="T837">
      <style:text-properties fo:color="#1f1f1f" fo:font-family="Arial" style:font-family-asian="Arial" style:font-family-complex="Arial" fo:font-size="12pt"/>
    </style:style>
    <style:style style:parent-style-name="142" style:family="paragraph" style:name="P44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38">
      <style:text-properties fo:color="#1f1f1f" fo:font-family="Arial" style:font-family-asian="Arial" style:font-family-complex="Arial" fo:font-size="12pt" fo:font-weight="bold"/>
    </style:style>
    <style:style style:family="paragraph" style:name="P442">
      <style:paragraph-properties fo:line-height="115%" fo:margin-left="0cm" fo:margin-right="0cm" fo:text-indent="0cm" fo:margin-top="0pt" fo:margin-bottom="0pt" fo:border="none"/>
      <style:text-properties/>
    </style:style>
    <style:style style:family="text" style:name="T839">
      <style:text-properties fo:color="#1f1f1f" fo:font-family="Arial" style:font-family-asian="Arial" style:font-family-complex="Arial" fo:font-size="12pt"/>
    </style:style>
    <style:style style:parent-style-name="142" style:family="paragraph" style:name="P44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0">
      <style:text-properties fo:color="#1f1f1f" fo:font-family="Arial" style:font-family-asian="Arial" style:font-family-complex="Arial" fo:font-size="12pt" fo:font-weight="bold"/>
    </style:style>
    <style:style style:family="paragraph" style:name="P444">
      <style:paragraph-properties fo:line-height="115%" fo:margin-left="0cm" fo:margin-right="0cm" fo:text-indent="0cm" fo:margin-top="0pt" fo:margin-bottom="0pt" fo:border="none"/>
      <style:text-properties/>
    </style:style>
    <style:style style:family="text" style:name="T841">
      <style:text-properties fo:color="#1f1f1f" fo:font-family="Arial" style:font-family-asian="Arial" style:font-family-complex="Arial" fo:font-size="12pt"/>
    </style:style>
    <style:style style:parent-style-name="142" style:family="paragraph" style:name="P44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2">
      <style:text-properties fo:color="#1f1f1f" fo:font-family="Arial" style:font-family-asian="Arial" style:font-family-complex="Arial" fo:font-size="12pt" fo:font-weight="bold"/>
    </style:style>
    <style:style style:family="paragraph" style:name="P446">
      <style:paragraph-properties fo:line-height="115%" fo:margin-left="0cm" fo:margin-right="0cm" fo:text-indent="0cm" fo:margin-top="0pt" fo:margin-bottom="0pt" fo:border="none"/>
      <style:text-properties/>
    </style:style>
    <style:style style:family="text" style:name="T843">
      <style:text-properties fo:color="#1f1f1f" fo:font-family="Arial" style:font-family-asian="Arial" style:font-family-complex="Arial" fo:font-size="12pt"/>
    </style:style>
    <style:style style:parent-style-name="142" style:family="paragraph" style:name="P44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4">
      <style:text-properties fo:color="#1f1f1f" fo:font-family="Arial" style:font-family-asian="Arial" style:font-family-complex="Arial" fo:font-size="12pt" fo:font-weight="bold"/>
    </style:style>
    <style:style style:family="paragraph" style:name="P448">
      <style:paragraph-properties fo:line-height="115%" fo:margin-left="0cm" fo:margin-right="0cm" fo:text-indent="0cm" fo:margin-top="0pt" fo:margin-bottom="0pt" fo:border="none"/>
      <style:text-properties/>
    </style:style>
    <style:style style:family="text" style:name="T845">
      <style:text-properties fo:color="#1f1f1f" fo:font-family="Arial" style:font-family-asian="Arial" style:font-family-complex="Arial" fo:font-size="12pt"/>
    </style:style>
    <style:style style:parent-style-name="141" style:family="paragraph" style:name="P44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46">
      <style:text-properties fo:color="#1f1f1f" fo:font-family="Arial" style:font-family-asian="Arial" style:font-family-complex="Arial" fo:font-size="14pt" fo:font-weight="bold"/>
    </style:style>
    <style:style style:parent-style-name="668" style:list-style-name="WWNum23" style:family="paragraph" style:name="P450">
      <style:paragraph-properties fo:line-height="115%" fo:margin-right="0cm" fo:margin-top="0pt" fo:margin-bottom="0pt" fo:border="none"/>
      <style:text-properties/>
    </style:style>
    <style:style style:family="text" style:name="T847">
      <style:text-properties fo:color="#1f1f1f" fo:font-family="Arial" style:font-family-asian="Arial" style:font-family-complex="Arial" fo:font-size="12pt"/>
    </style:style>
    <style:style style:parent-style-name="668" style:list-style-name="WWNum23" style:family="paragraph" style:name="P451">
      <style:paragraph-properties fo:line-height="115%" fo:margin-right="0cm" fo:margin-top="0pt" fo:margin-bottom="0pt" fo:border="none"/>
      <style:text-properties/>
    </style:style>
    <style:style style:family="text" style:name="T848">
      <style:text-properties fo:color="#1f1f1f" fo:font-family="Arial" style:font-family-asian="Arial" style:font-family-complex="Arial" fo:font-size="12pt"/>
    </style:style>
    <style:style style:parent-style-name="668" style:list-style-name="WWNum23" style:family="paragraph" style:name="P452">
      <style:paragraph-properties fo:line-height="115%" fo:margin-right="0cm" fo:margin-top="0pt" fo:margin-bottom="0pt" fo:border="none"/>
      <style:text-properties/>
    </style:style>
    <style:style style:family="text" style:name="T849">
      <style:text-properties fo:color="#1f1f1f" fo:font-family="Arial" style:font-family-asian="Arial" style:font-family-complex="Arial" fo:font-size="12pt"/>
    </style:style>
    <style:style style:parent-style-name="668" style:list-style-name="WWNum23" style:family="paragraph" style:name="P453">
      <style:paragraph-properties fo:line-height="115%" fo:margin-right="0cm" fo:margin-top="0pt" fo:margin-bottom="0pt" fo:border="none"/>
      <style:text-properties/>
    </style:style>
    <style:style style:family="text" style:name="T850">
      <style:text-properties fo:color="#1f1f1f" fo:font-family="Arial" style:font-family-asian="Arial" style:font-family-complex="Arial" fo:font-size="12pt"/>
    </style:style>
    <style:style style:family="paragraph" style:name="P454">
      <style:paragraph-properties/>
      <style:text-properties fo:font-family="Arial" style:font-family-asian="Arial" style:font-family-complex="Arial" fo:font-size="12pt" style:font-size-complex="12pt"/>
    </style:style>
    <style:style style:family="text" style:name="T851">
      <style:text-properties/>
    </style:style>
    <style:style style:family="text" style:name="T852">
      <style:text-properties/>
    </style:style>
    <style:style style:family="text" style:name="T853">
      <style:text-properties/>
    </style:style>
    <style:style style:parent-style-name="141" style:family="paragraph" style:name="P455">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854">
      <style:text-properties fo:color="#1f1f1f" fo:font-family="Arial" style:font-family-asian="Arial" style:font-family-complex="Arial" fo:font-size="14pt" fo:font-weight="bold"/>
    </style:style>
    <style:style style:family="paragraph" style:name="P456">
      <style:paragraph-properties fo:line-height="115%" fo:margin-left="0cm" fo:margin-right="0cm" fo:text-indent="0cm" fo:margin-top="0pt" fo:margin-bottom="0pt" fo:border="none"/>
      <style:text-properties/>
    </style:style>
    <style:style style:family="text" style:name="T855">
      <style:text-properties fo:color="#1f1f1f" fo:font-family="Arial" style:font-family-asian="Arial" style:font-family-complex="Arial" fo:font-size="12pt"/>
    </style:style>
    <style:style style:parent-style-name="142" style:family="paragraph" style:name="P45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56">
      <style:text-properties fo:color="#1f1f1f" fo:font-family="Arial" style:font-family-asian="Arial" style:font-family-complex="Arial" fo:font-size="12pt" fo:font-weight="bold"/>
    </style:style>
    <style:style style:family="paragraph" style:name="P458">
      <style:paragraph-properties fo:line-height="115%" fo:margin-left="0cm" fo:margin-right="0cm" fo:text-indent="0cm" fo:margin-top="0pt" fo:margin-bottom="0pt" fo:border="none"/>
      <style:text-properties/>
    </style:style>
    <style:style style:family="text" style:name="T857">
      <style:text-properties fo:color="#1f1f1f" fo:font-family="Arial" style:font-family-asian="Arial" style:font-family-complex="Arial" fo:font-size="12pt"/>
    </style:style>
    <style:style style:parent-style-name="142" style:family="paragraph" style:name="P45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58">
      <style:text-properties fo:color="#1f1f1f" fo:font-family="Arial" style:font-family-asian="Arial" style:font-family-complex="Arial" fo:font-size="12pt" fo:font-weight="bold"/>
    </style:style>
    <style:style style:family="paragraph" style:name="P460">
      <style:paragraph-properties fo:line-height="115%" fo:margin-left="0cm" fo:margin-right="0cm" fo:text-indent="0cm" fo:margin-top="0pt" fo:margin-bottom="0pt" fo:border="none"/>
      <style:text-properties/>
    </style:style>
    <style:style style:family="text" style:name="T859">
      <style:text-properties fo:color="#1f1f1f" fo:font-family="Arial" style:font-family-asian="Arial" style:font-family-complex="Arial" fo:font-size="12pt"/>
    </style:style>
    <style:style style:parent-style-name="142" style:family="paragraph" style:name="P46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60">
      <style:text-properties fo:color="#1f1f1f" fo:font-family="Arial" style:font-family-asian="Arial" style:font-family-complex="Arial" fo:font-size="12pt" fo:font-weight="bold"/>
    </style:style>
    <style:style style:family="paragraph" style:name="P462">
      <style:paragraph-properties fo:line-height="115%" fo:margin-left="0cm" fo:margin-right="0cm" fo:text-indent="0cm" fo:margin-top="0pt" fo:margin-bottom="0pt" fo:border="none"/>
      <style:text-properties/>
    </style:style>
    <style:style style:family="text" style:name="T861">
      <style:text-properties fo:color="#1f1f1f" fo:font-family="Arial" style:font-family-asian="Arial" style:font-family-complex="Arial" fo:font-size="12pt"/>
    </style:style>
    <style:style style:parent-style-name="142" style:family="paragraph" style:name="P46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62">
      <style:text-properties fo:color="#1f1f1f" fo:font-family="Arial" style:font-family-asian="Arial" style:font-family-complex="Arial" fo:font-size="12pt" fo:font-weight="bold"/>
    </style:style>
    <style:style style:family="paragraph" style:name="P464">
      <style:paragraph-properties fo:line-height="115%" fo:margin-left="0cm" fo:margin-right="0cm" fo:text-indent="0cm" fo:margin-top="0pt" fo:margin-bottom="0pt" fo:border="none"/>
      <style:text-properties/>
    </style:style>
    <style:style style:family="text" style:name="T863">
      <style:text-properties fo:color="#1f1f1f" fo:font-family="Arial" style:font-family-asian="Arial" style:font-family-complex="Arial" fo:font-size="12pt"/>
    </style:style>
    <style:style style:parent-style-name="141" style:family="paragraph" style:name="P46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64">
      <style:text-properties fo:color="#1f1f1f" fo:font-family="Arial" style:font-family-asian="Arial" style:font-family-complex="Arial" fo:font-size="14pt" fo:font-weight="bold"/>
    </style:style>
    <style:style style:parent-style-name="668" style:list-style-name="WWNum24" style:family="paragraph" style:name="P466">
      <style:paragraph-properties fo:line-height="115%" fo:margin-right="0cm" fo:margin-top="0pt" fo:margin-bottom="0pt" fo:border="none"/>
      <style:text-properties/>
    </style:style>
    <style:style style:family="text" style:name="T865">
      <style:text-properties fo:color="#1f1f1f" fo:font-family="Arial" style:font-family-asian="Arial" style:font-family-complex="Arial" fo:font-size="12pt"/>
    </style:style>
    <style:style style:parent-style-name="668" style:list-style-name="WWNum24" style:family="paragraph" style:name="P467">
      <style:paragraph-properties fo:line-height="115%" fo:margin-right="0cm" fo:margin-top="0pt" fo:margin-bottom="0pt" fo:border="none"/>
      <style:text-properties/>
    </style:style>
    <style:style style:family="text" style:name="T866">
      <style:text-properties fo:color="#1f1f1f" fo:font-family="Arial" style:font-family-asian="Arial" style:font-family-complex="Arial" fo:font-size="12pt"/>
    </style:style>
    <style:style style:parent-style-name="668" style:list-style-name="WWNum24" style:family="paragraph" style:name="P468">
      <style:paragraph-properties fo:line-height="115%" fo:margin-right="0cm" fo:margin-top="0pt" fo:margin-bottom="0pt" fo:border="none"/>
      <style:text-properties/>
    </style:style>
    <style:style style:family="text" style:name="T867">
      <style:text-properties fo:color="#1f1f1f" fo:font-family="Arial" style:font-family-asian="Arial" style:font-family-complex="Arial" fo:font-size="12pt"/>
    </style:style>
    <style:style style:parent-style-name="668" style:list-style-name="WWNum24" style:family="paragraph" style:name="P469">
      <style:paragraph-properties fo:line-height="115%" fo:margin-right="0cm" fo:margin-top="0pt" fo:margin-bottom="0pt" fo:border="none"/>
      <style:text-properties/>
    </style:style>
    <style:style style:family="text" style:name="T868">
      <style:text-properties fo:color="#1f1f1f" fo:font-family="Arial" style:font-family-asian="Arial" style:font-family-complex="Arial" fo:font-size="12pt"/>
    </style:style>
    <style:style style:family="paragraph" style:name="P470">
      <style:paragraph-properties/>
      <style:text-properties fo:font-family="Arial" style:font-family-asian="Arial" style:font-family-complex="Arial" fo:font-size="12pt" style:font-size-complex="12pt"/>
    </style:style>
    <style:style style:family="text" style:name="T869">
      <style:text-properties/>
    </style:style>
    <style:style style:family="text" style:name="T870">
      <style:text-properties/>
    </style:style>
    <style:style style:family="text" style:name="T871">
      <style:text-properties/>
    </style:style>
    <style:style style:family="paragraph" style:name="P471">
      <style:paragraph-properties fo:line-height="115%" fo:margin-left="0cm" fo:margin-right="0cm" fo:text-indent="0cm" fo:margin-top="0pt" fo:margin-bottom="0pt" fo:break-before="page" fo:border="none"/>
      <style:text-properties/>
    </style:style>
    <style:style style:family="text" style:name="T872">
      <style:text-properties fo:color="#1f1f1f" fo:font-family="Arial" style:font-family-asian="Arial" style:font-family-complex="Arial" fo:font-size="12pt"/>
    </style:style>
    <style:style style:parent-style-name="141" style:family="paragraph" style:name="P47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73">
      <style:text-properties fo:color="#1f1f1f" fo:font-family="Arial" style:font-family-asian="Arial" style:font-family-complex="Arial" fo:font-size="14pt" fo:font-weight="bold"/>
    </style:style>
    <style:style style:family="paragraph" style:name="P473">
      <style:paragraph-properties fo:line-height="115%" fo:margin-left="0cm" fo:margin-right="0cm" fo:text-indent="0cm" fo:margin-top="0pt" fo:margin-bottom="0pt" fo:border="none"/>
      <style:text-properties/>
    </style:style>
    <style:style style:family="text" style:name="T874">
      <style:text-properties fo:color="#1f1f1f" fo:font-family="Arial" style:font-family-asian="Arial" style:font-family-complex="Arial" fo:font-size="12pt"/>
    </style:style>
    <style:style style:parent-style-name="142" style:family="paragraph" style:name="P47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75">
      <style:text-properties fo:color="#1f1f1f" fo:font-family="Arial" style:font-family-asian="Arial" style:font-family-complex="Arial" fo:font-size="12pt" fo:font-weight="bold"/>
    </style:style>
    <style:style style:family="paragraph" style:name="P475">
      <style:paragraph-properties fo:line-height="115%" fo:margin-left="0cm" fo:margin-right="0cm" fo:text-indent="0cm" fo:margin-top="0pt" fo:margin-bottom="0pt" fo:border="none"/>
      <style:text-properties/>
    </style:style>
    <style:style style:family="text" style:name="T876">
      <style:text-properties fo:color="#1f1f1f" fo:font-family="Arial" style:font-family-asian="Arial" style:font-family-complex="Arial" fo:font-size="12pt"/>
    </style:style>
    <style:style style:family="text" style:name="T877">
      <style:text-properties fo:color="#1f1f1f" fo:font-family="Arial" style:font-family-asian="Arial" style:font-family-complex="Arial" fo:font-size="12pt"/>
    </style:style>
    <style:style style:parent-style-name="142" style:family="paragraph" style:name="P47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78">
      <style:text-properties fo:color="#1f1f1f" fo:font-family="Arial" style:font-family-asian="Arial" style:font-family-complex="Arial" fo:font-size="12pt" fo:font-weight="bold"/>
    </style:style>
    <style:style style:family="paragraph" style:name="P477">
      <style:paragraph-properties fo:line-height="115%" fo:margin-left="0cm" fo:margin-right="0cm" fo:text-indent="0cm" fo:margin-top="0pt" fo:margin-bottom="0pt" fo:border="none"/>
      <style:text-properties/>
    </style:style>
    <style:style style:family="text" style:name="T879">
      <style:text-properties fo:color="#1f1f1f" fo:font-family="Arial" style:font-family-asian="Arial" style:font-family-complex="Arial" fo:font-size="12pt"/>
    </style:style>
    <style:style style:family="text" style:name="T880">
      <style:text-properties fo:color="#1f1f1f" fo:font-family="Arial" style:font-family-asian="Arial" style:font-family-complex="Arial" fo:font-size="12pt"/>
    </style:style>
    <style:style style:parent-style-name="142" style:family="paragraph" style:name="P47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81">
      <style:text-properties fo:color="#1f1f1f" fo:font-family="Arial" style:font-family-asian="Arial" style:font-family-complex="Arial" fo:font-size="12pt" fo:font-weight="bold"/>
    </style:style>
    <style:style style:family="paragraph" style:name="P479">
      <style:paragraph-properties fo:line-height="115%" fo:margin-left="0cm" fo:margin-right="0cm" fo:text-indent="0cm" fo:margin-top="0pt" fo:margin-bottom="0pt" fo:border="none"/>
      <style:text-properties/>
    </style:style>
    <style:style style:family="text" style:name="T882">
      <style:text-properties fo:color="#1f1f1f" fo:font-family="Arial" style:font-family-asian="Arial" style:font-family-complex="Arial" fo:font-size="12pt"/>
    </style:style>
    <style:style style:family="text" style:name="T883">
      <style:text-properties fo:color="#1f1f1f" fo:font-family="Arial" style:font-family-asian="Arial" style:font-family-complex="Arial" fo:font-size="12pt"/>
    </style:style>
    <style:style style:parent-style-name="142" style:family="paragraph" style:name="P48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84">
      <style:text-properties fo:color="#1f1f1f" fo:font-family="Arial" style:font-family-asian="Arial" style:font-family-complex="Arial" fo:font-size="12pt" fo:font-weight="bold"/>
    </style:style>
    <style:style style:family="paragraph" style:name="P481">
      <style:paragraph-properties fo:line-height="115%" fo:margin-left="0cm" fo:margin-right="0cm" fo:text-indent="0cm" fo:margin-top="0pt" fo:margin-bottom="0pt" fo:border="none"/>
      <style:text-properties/>
    </style:style>
    <style:style style:family="text" style:name="T885">
      <style:text-properties fo:color="#1f1f1f" fo:font-family="Arial" style:font-family-asian="Arial" style:font-family-complex="Arial" fo:font-size="12pt"/>
    </style:style>
    <style:style style:family="text" style:name="T886">
      <style:text-properties fo:color="#1f1f1f" fo:font-family="Arial" style:font-family-asian="Arial" style:font-family-complex="Arial" fo:font-size="12pt"/>
    </style:style>
    <style:style style:parent-style-name="141" style:family="paragraph" style:name="P48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87">
      <style:text-properties fo:color="#1f1f1f" fo:font-family="Arial" style:font-family-asian="Arial" style:font-family-complex="Arial" fo:font-size="14pt" fo:font-weight="bold"/>
    </style:style>
    <style:style style:parent-style-name="668" style:list-style-name="WWNum25" style:family="paragraph" style:name="P483">
      <style:paragraph-properties fo:line-height="115%" fo:margin-right="0cm" fo:margin-top="0pt" fo:margin-bottom="0pt" fo:border="none"/>
      <style:text-properties/>
    </style:style>
    <style:style style:family="text" style:name="T888">
      <style:text-properties fo:color="#1f1f1f" fo:font-family="Arial" style:font-family-asian="Arial" style:font-family-complex="Arial" fo:font-size="12pt"/>
    </style:style>
    <style:style style:parent-style-name="668" style:list-style-name="WWNum25" style:family="paragraph" style:name="P484">
      <style:paragraph-properties fo:line-height="115%" fo:margin-right="0cm" fo:margin-top="0pt" fo:margin-bottom="0pt" fo:border="none"/>
      <style:text-properties/>
    </style:style>
    <style:style style:family="text" style:name="T889">
      <style:text-properties fo:color="#1f1f1f" fo:font-family="Arial" style:font-family-asian="Arial" style:font-family-complex="Arial" fo:font-size="12pt"/>
    </style:style>
    <style:style style:parent-style-name="668" style:list-style-name="WWNum25" style:family="paragraph" style:name="P485">
      <style:paragraph-properties fo:line-height="115%" fo:margin-right="0cm" fo:margin-top="0pt" fo:margin-bottom="0pt" fo:border="none"/>
      <style:text-properties/>
    </style:style>
    <style:style style:family="text" style:name="T890">
      <style:text-properties fo:color="#1f1f1f" fo:font-family="Arial" style:font-family-asian="Arial" style:font-family-complex="Arial" fo:font-size="12pt"/>
    </style:style>
    <style:style style:parent-style-name="668" style:list-style-name="WWNum25" style:family="paragraph" style:name="P486">
      <style:paragraph-properties fo:line-height="115%" fo:margin-right="0cm" fo:margin-top="0pt" fo:margin-bottom="0pt" fo:border="none"/>
      <style:text-properties/>
    </style:style>
    <style:style style:family="text" style:name="T891">
      <style:text-properties fo:color="#1f1f1f" fo:font-family="Arial" style:font-family-asian="Arial" style:font-family-complex="Arial" fo:font-size="12pt"/>
    </style:style>
    <style:style style:family="paragraph" style:name="P487">
      <style:paragraph-properties/>
      <style:text-properties fo:font-family="Arial" style:font-family-asian="Arial" style:font-family-complex="Arial" fo:font-size="12pt" style:font-size-complex="12pt"/>
    </style:style>
    <style:style style:family="text" style:name="T892">
      <style:text-properties/>
    </style:style>
    <style:style style:family="text" style:name="T893">
      <style:text-properties/>
    </style:style>
    <style:style style:family="text" style:name="T894">
      <style:text-properties/>
    </style:style>
    <style:style style:family="paragraph" style:name="P488">
      <style:paragraph-properties fo:line-height="115%" fo:margin-left="0cm" fo:margin-right="0cm" fo:text-indent="0cm" fo:margin-top="0pt" fo:margin-bottom="0pt" fo:break-before="page" fo:border="none"/>
      <style:text-properties/>
    </style:style>
    <style:style style:family="text" style:name="T895">
      <style:text-properties fo:color="#1f1f1f" fo:font-family="Arial" style:font-family-asian="Arial" style:font-family-complex="Arial" fo:font-size="12pt"/>
    </style:style>
    <style:style style:parent-style-name="141" style:family="paragraph" style:name="P48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96">
      <style:text-properties fo:color="#1f1f1f" fo:font-family="Arial" style:font-family-asian="Arial" style:font-family-complex="Arial" fo:font-size="14pt" fo:font-weight="bold"/>
    </style:style>
    <style:style style:family="paragraph" style:name="P490">
      <style:paragraph-properties fo:line-height="115%" fo:margin-left="0cm" fo:margin-right="0cm" fo:text-indent="0cm" fo:margin-top="0pt" fo:margin-bottom="0pt" fo:border="none"/>
      <style:text-properties/>
    </style:style>
    <style:style style:family="text" style:name="T897">
      <style:text-properties fo:color="#1f1f1f" fo:font-family="Arial" style:font-family-asian="Arial" style:font-family-complex="Arial" fo:font-size="12pt"/>
    </style:style>
    <style:style style:parent-style-name="142" style:family="paragraph" style:name="P49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98">
      <style:text-properties fo:color="#1f1f1f" fo:font-family="Arial" style:font-family-asian="Arial" style:font-family-complex="Arial" fo:font-size="12pt" fo:font-weight="bold"/>
    </style:style>
    <style:style style:family="paragraph" style:name="P492">
      <style:paragraph-properties fo:line-height="115%" fo:margin-left="0cm" fo:margin-right="0cm" fo:text-indent="0cm" fo:margin-top="0pt" fo:margin-bottom="0pt" fo:border="none"/>
      <style:text-properties/>
    </style:style>
    <style:style style:family="text" style:name="T899">
      <style:text-properties fo:color="#1f1f1f" fo:font-family="Arial" style:font-family-asian="Arial" style:font-family-complex="Arial" fo:font-size="12pt"/>
    </style:style>
    <style:style style:family="text" style:name="T900">
      <style:text-properties fo:color="#1f1f1f" fo:font-family="Arial" style:font-family-asian="Arial" style:font-family-complex="Arial" fo:font-size="12pt"/>
    </style:style>
    <style:style style:parent-style-name="142" style:family="paragraph" style:name="P49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01">
      <style:text-properties fo:color="#1f1f1f" fo:font-family="Arial" style:font-family-asian="Arial" style:font-family-complex="Arial" fo:font-size="12pt" fo:font-weight="bold"/>
    </style:style>
    <style:style style:family="paragraph" style:name="P494">
      <style:paragraph-properties fo:line-height="115%" fo:margin-left="0cm" fo:margin-right="0cm" fo:text-indent="0cm" fo:margin-top="0pt" fo:margin-bottom="0pt" fo:border="none"/>
      <style:text-properties/>
    </style:style>
    <style:style style:family="text" style:name="T902">
      <style:text-properties fo:color="#1f1f1f" fo:font-family="Arial" style:font-family-asian="Arial" style:font-family-complex="Arial" fo:font-size="12pt"/>
    </style:style>
    <style:style style:parent-style-name="142" style:family="paragraph" style:name="P49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03">
      <style:text-properties fo:color="#1f1f1f" fo:font-family="Arial" style:font-family-asian="Arial" style:font-family-complex="Arial" fo:font-size="12pt" fo:font-weight="bold"/>
    </style:style>
    <style:style style:family="paragraph" style:name="P496">
      <style:paragraph-properties fo:line-height="115%" fo:margin-left="0cm" fo:margin-right="0cm" fo:text-indent="0cm" fo:margin-top="0pt" fo:margin-bottom="0pt" fo:border="none"/>
      <style:text-properties/>
    </style:style>
    <style:style style:family="text" style:name="T904">
      <style:text-properties fo:color="#1f1f1f" fo:font-family="Arial" style:font-family-asian="Arial" style:font-family-complex="Arial" fo:font-size="12pt"/>
    </style:style>
    <style:style style:parent-style-name="142" style:family="paragraph" style:name="P49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05">
      <style:text-properties fo:color="#1f1f1f" fo:font-family="Arial" style:font-family-asian="Arial" style:font-family-complex="Arial" fo:font-size="12pt" fo:font-weight="bold"/>
    </style:style>
    <style:style style:family="paragraph" style:name="P498">
      <style:paragraph-properties fo:line-height="115%" fo:margin-left="0cm" fo:margin-right="0cm" fo:text-indent="0cm" fo:margin-top="0pt" fo:margin-bottom="0pt" fo:border="none"/>
      <style:text-properties/>
    </style:style>
    <style:style style:family="text" style:name="T906">
      <style:text-properties fo:color="#1f1f1f" fo:font-family="Arial" style:font-family-asian="Arial" style:font-family-complex="Arial" fo:font-size="12pt"/>
    </style:style>
    <style:style style:family="table" style:name="ta5">
      <style:paragraph-properties fo:line-height="100%" fo:margin-bottom="0pt"/>
      <style:table-properties style:width="6.178cm" fo:margin-left="0cm" table:align="left" style:use-optimal-column-width="true"/>
    </style:style>
    <style:style style:family="table-column" style:name="co10">
      <style:table-column-properties style:column-width="1.893cm" style:use-optimal-column-width="true"/>
    </style:style>
    <style:style style:family="table-column" style:name="co11">
      <style:table-column-properties style:column-width="2.246cm" style:use-optimal-column-width="true"/>
    </style:style>
    <style:style style:family="table-column" style:name="co12">
      <style:table-column-properties style:column-width="2.039cm" style:use-optimal-column-width="true"/>
    </style:style>
    <style:style style:family="table-row" style:name="ro23">
      <style:table-row-properties/>
    </style:style>
    <style:style style:family="table-cell" style:name="ce5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99">
      <style:paragraph-properties style:line-height-at-least="12pt" fo:margin-top="0pt" fo:margin-bottom="0pt"/>
      <style:text-properties/>
    </style:style>
    <style:style style:family="text" style:name="T907">
      <style:text-properties fo:color="#1f1f1f" fo:font-family="Arial" style:font-family-asian="Arial" style:font-family-complex="Arial" fo:font-size="12pt" fo:font-weight="bold"/>
    </style:style>
    <style:style style:family="table-cell" style:name="ce5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00">
      <style:paragraph-properties style:line-height-at-least="12pt" fo:margin-top="0pt" fo:margin-bottom="0pt"/>
      <style:text-properties/>
    </style:style>
    <style:style style:family="text" style:name="T908">
      <style:text-properties fo:color="#1f1f1f" fo:font-family="Arial" style:font-family-asian="Arial" style:font-family-complex="Arial" fo:font-size="12pt" fo:font-weight="bold"/>
    </style:style>
    <style:style style:family="table-cell" style:name="ce5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01">
      <style:paragraph-properties style:line-height-at-least="12pt" fo:margin-top="0pt" fo:margin-bottom="0pt"/>
      <style:text-properties/>
    </style:style>
    <style:style style:family="text" style:name="T909">
      <style:text-properties fo:color="#1f1f1f" fo:font-family="Arial" style:font-family-asian="Arial" style:font-family-complex="Arial" fo:font-size="12pt" fo:font-weight="bold"/>
    </style:style>
    <style:style style:family="table-row" style:name="ro24">
      <style:table-row-properties/>
    </style:style>
    <style:style style:family="table-cell" style:name="ce5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02">
      <style:paragraph-properties style:line-height-at-least="12pt" fo:margin-top="0pt" fo:margin-bottom="0pt"/>
      <style:text-properties/>
    </style:style>
    <style:style style:family="text" style:name="T910">
      <style:text-properties fo:color="#1f1f1f" fo:font-family="Arial" style:font-family-asian="Arial" style:font-family-complex="Arial" fo:font-size="12pt"/>
    </style:style>
    <style:style style:family="table-cell" style:name="ce5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03">
      <style:paragraph-properties style:line-height-at-least="12pt" fo:margin-top="0pt" fo:margin-bottom="0pt"/>
      <style:text-properties/>
    </style:style>
    <style:style style:family="text" style:name="T911">
      <style:text-properties fo:color="#1f1f1f" fo:font-family="Arial" style:font-family-asian="Arial" style:font-family-complex="Arial" fo:font-size="12pt"/>
    </style:style>
    <style:style style:family="table-cell" style:name="ce5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04">
      <style:paragraph-properties style:line-height-at-least="12pt" fo:margin-top="0pt" fo:margin-bottom="0pt"/>
      <style:text-properties/>
    </style:style>
    <style:style style:family="text" style:name="T912">
      <style:text-properties fo:color="#1f1f1f" fo:font-family="Arial" style:font-family-asian="Arial" style:font-family-complex="Arial" fo:font-size="12pt"/>
    </style:style>
    <style:style style:family="table-row" style:name="ro25">
      <style:table-row-properties/>
    </style:style>
    <style:style style:family="table-cell" style:name="ce6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05">
      <style:paragraph-properties style:line-height-at-least="12pt" fo:margin-top="0pt" fo:margin-bottom="0pt"/>
      <style:text-properties/>
    </style:style>
    <style:style style:family="text" style:name="T913">
      <style:text-properties fo:color="#1f1f1f" fo:font-family="Arial" style:font-family-asian="Arial" style:font-family-complex="Arial" fo:font-size="12pt"/>
    </style:style>
    <style:style style:family="table-cell" style:name="ce6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06">
      <style:paragraph-properties style:line-height-at-least="12pt" fo:margin-top="0pt" fo:margin-bottom="0pt"/>
      <style:text-properties/>
    </style:style>
    <style:style style:family="text" style:name="T914">
      <style:text-properties fo:color="#1f1f1f" fo:font-family="Arial" style:font-family-asian="Arial" style:font-family-complex="Arial" fo:font-size="12pt"/>
    </style:style>
    <style:style style:family="table-cell" style:name="ce6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07">
      <style:paragraph-properties style:line-height-at-least="12pt" fo:margin-top="0pt" fo:margin-bottom="0pt"/>
      <style:text-properties/>
    </style:style>
    <style:style style:family="text" style:name="T915">
      <style:text-properties fo:color="#1f1f1f" fo:font-family="Arial" style:font-family-asian="Arial" style:font-family-complex="Arial" fo:font-size="12pt"/>
    </style:style>
    <style:style style:family="table-row" style:name="ro26">
      <style:table-row-properties/>
    </style:style>
    <style:style style:family="table-cell" style:name="ce6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08">
      <style:paragraph-properties style:line-height-at-least="12pt" fo:margin-top="0pt" fo:margin-bottom="0pt"/>
      <style:text-properties/>
    </style:style>
    <style:style style:family="text" style:name="T916">
      <style:text-properties fo:color="#1f1f1f" fo:font-family="Arial" style:font-family-asian="Arial" style:font-family-complex="Arial" fo:font-size="12pt"/>
    </style:style>
    <style:style style:family="table-cell" style:name="ce6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09">
      <style:paragraph-properties style:line-height-at-least="12pt" fo:margin-top="0pt" fo:margin-bottom="0pt"/>
      <style:text-properties/>
    </style:style>
    <style:style style:family="text" style:name="T917">
      <style:text-properties fo:color="#1f1f1f" fo:font-family="Arial" style:font-family-asian="Arial" style:font-family-complex="Arial" fo:font-size="12pt"/>
    </style:style>
    <style:style style:family="table-cell" style:name="ce6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10">
      <style:paragraph-properties style:line-height-at-least="12pt" fo:margin-top="0pt" fo:margin-bottom="0pt"/>
      <style:text-properties/>
    </style:style>
    <style:style style:family="text" style:name="T918">
      <style:text-properties fo:color="#1f1f1f" fo:font-family="Arial" style:font-family-asian="Arial" style:font-family-complex="Arial" fo:font-size="12pt"/>
    </style:style>
    <style:style style:family="table-row" style:name="ro27">
      <style:table-row-properties/>
    </style:style>
    <style:style style:family="table-cell" style:name="ce6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11">
      <style:paragraph-properties style:line-height-at-least="12pt" fo:margin-top="0pt" fo:margin-bottom="0pt"/>
      <style:text-properties/>
    </style:style>
    <style:style style:family="text" style:name="T919">
      <style:text-properties fo:color="#1f1f1f" fo:font-family="Arial" style:font-family-asian="Arial" style:font-family-complex="Arial" fo:font-size="12pt"/>
    </style:style>
    <style:style style:family="table-cell" style:name="ce6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12">
      <style:paragraph-properties style:line-height-at-least="12pt" fo:margin-top="0pt" fo:margin-bottom="0pt"/>
      <style:text-properties/>
    </style:style>
    <style:style style:family="text" style:name="T920">
      <style:text-properties fo:color="#1f1f1f" fo:font-family="Arial" style:font-family-asian="Arial" style:font-family-complex="Arial" fo:font-size="12pt"/>
    </style:style>
    <style:style style:family="table-cell" style:name="ce6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13">
      <style:paragraph-properties style:line-height-at-least="12pt" fo:margin-top="0pt" fo:margin-bottom="0pt"/>
      <style:text-properties/>
    </style:style>
    <style:style style:family="text" style:name="T921">
      <style:text-properties fo:color="#1f1f1f" fo:font-family="Arial" style:font-family-asian="Arial" style:font-family-complex="Arial" fo:font-size="12pt"/>
    </style:style>
    <style:style style:family="table-row" style:name="ro28">
      <style:table-row-properties/>
    </style:style>
    <style:style style:family="table-cell" style:name="ce6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14">
      <style:paragraph-properties style:line-height-at-least="12pt" fo:margin-top="0pt" fo:margin-bottom="0pt"/>
      <style:text-properties/>
    </style:style>
    <style:style style:family="text" style:name="T922">
      <style:text-properties fo:color="#1f1f1f" fo:font-family="Arial" style:font-family-asian="Arial" style:font-family-complex="Arial" fo:font-size="12pt"/>
    </style:style>
    <style:style style:family="table-cell" style:name="ce7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15">
      <style:paragraph-properties style:line-height-at-least="12pt" fo:margin-top="0pt" fo:margin-bottom="0pt"/>
      <style:text-properties/>
    </style:style>
    <style:style style:family="text" style:name="T923">
      <style:text-properties fo:color="#1f1f1f" fo:font-family="Arial" style:font-family-asian="Arial" style:font-family-complex="Arial" fo:font-size="12pt"/>
    </style:style>
    <style:style style:family="table-cell" style:name="ce7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16">
      <style:paragraph-properties style:line-height-at-least="12pt" fo:margin-top="0pt" fo:margin-bottom="0pt"/>
      <style:text-properties/>
    </style:style>
    <style:style style:family="text" style:name="T924">
      <style:text-properties fo:color="#1f1f1f" fo:font-family="Arial" style:font-family-asian="Arial" style:font-family-complex="Arial" fo:font-size="12pt"/>
    </style:style>
    <style:style style:parent-style-name="141" style:family="paragraph" style:name="P51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25">
      <style:text-properties fo:color="#1f1f1f" fo:font-family="Arial" style:font-family-asian="Arial" style:font-family-complex="Arial" fo:font-size="14pt" fo:font-weight="bold"/>
    </style:style>
    <style:style style:parent-style-name="668" style:list-style-name="WWNum26" style:family="paragraph" style:name="P518">
      <style:paragraph-properties fo:line-height="115%" fo:margin-right="0cm" fo:margin-top="0pt" fo:margin-bottom="0pt" fo:border="none"/>
      <style:text-properties/>
    </style:style>
    <style:style style:family="text" style:name="T926">
      <style:text-properties fo:color="#1f1f1f" fo:font-family="Arial" style:font-family-asian="Arial" style:font-family-complex="Arial" fo:font-size="12pt"/>
    </style:style>
    <style:style style:parent-style-name="668" style:list-style-name="WWNum26" style:family="paragraph" style:name="P519">
      <style:paragraph-properties fo:line-height="115%" fo:margin-right="0cm" fo:margin-top="0pt" fo:margin-bottom="0pt" fo:border="none"/>
      <style:text-properties/>
    </style:style>
    <style:style style:family="text" style:name="T927">
      <style:text-properties fo:color="#1f1f1f" fo:font-family="Arial" style:font-family-asian="Arial" style:font-family-complex="Arial" fo:font-size="12pt"/>
    </style:style>
    <style:style style:parent-style-name="668" style:list-style-name="WWNum26" style:family="paragraph" style:name="P520">
      <style:paragraph-properties fo:line-height="115%" fo:margin-right="0cm" fo:margin-top="0pt" fo:margin-bottom="0pt" fo:border="none"/>
      <style:text-properties/>
    </style:style>
    <style:style style:family="text" style:name="T928">
      <style:text-properties fo:color="#1f1f1f" fo:font-family="Arial" style:font-family-asian="Arial" style:font-family-complex="Arial" fo:font-size="12pt"/>
    </style:style>
    <style:style style:parent-style-name="668" style:list-style-name="WWNum26" style:family="paragraph" style:name="P521">
      <style:paragraph-properties fo:line-height="115%" fo:margin-right="0cm" fo:margin-top="0pt" fo:margin-bottom="0pt" fo:border="none"/>
      <style:text-properties/>
    </style:style>
    <style:style style:family="text" style:name="T929">
      <style:text-properties fo:color="#1f1f1f" fo:font-family="Arial" style:font-family-asian="Arial" style:font-family-complex="Arial" fo:font-size="12pt"/>
    </style:style>
    <style:style style:family="paragraph" style:name="P522">
      <style:paragraph-properties/>
      <style:text-properties fo:font-family="Arial" style:font-family-asian="Arial" style:font-family-complex="Arial" fo:font-size="12pt" style:font-size-complex="12pt"/>
    </style:style>
    <style:style style:family="text" style:name="T930">
      <style:text-properties/>
    </style:style>
    <style:style style:family="text" style:name="T931">
      <style:text-properties/>
    </style:style>
    <style:style style:family="text" style:name="T932">
      <style:text-properties/>
    </style:style>
    <style:style style:family="paragraph" style:name="P523">
      <style:paragraph-properties fo:line-height="115%" fo:margin-left="0cm" fo:margin-right="0cm" fo:text-indent="0cm" fo:margin-top="0pt" fo:margin-bottom="0pt" fo:break-before="page" fo:border="none"/>
      <style:text-properties/>
    </style:style>
    <style:style style:family="text" style:name="T933">
      <style:text-properties fo:color="#1f1f1f" fo:font-family="Arial" style:font-family-asian="Arial" style:font-family-complex="Arial" fo:font-size="12pt"/>
    </style:style>
    <style:style style:parent-style-name="141" style:family="paragraph" style:name="P52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34">
      <style:text-properties fo:color="#1f1f1f" fo:font-family="Arial" style:font-family-asian="Arial" style:font-family-complex="Arial" fo:font-size="14pt" fo:font-weight="bold"/>
    </style:style>
    <style:style style:family="paragraph" style:name="P525">
      <style:paragraph-properties fo:line-height="115%" fo:margin-left="0cm" fo:margin-right="0cm" fo:text-indent="0cm" fo:margin-top="0pt" fo:margin-bottom="0pt" fo:border="none"/>
      <style:text-properties/>
    </style:style>
    <style:style style:family="text" style:name="T935">
      <style:text-properties fo:color="#1f1f1f" fo:font-family="Arial" style:font-family-asian="Arial" style:font-family-complex="Arial" fo:font-size="12pt"/>
    </style:style>
    <style:style style:parent-style-name="142" style:family="paragraph" style:name="P52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36">
      <style:text-properties fo:color="#1f1f1f" fo:font-family="Arial" style:font-family-asian="Arial" style:font-family-complex="Arial" fo:font-size="12pt" fo:font-weight="bold"/>
    </style:style>
    <style:style style:family="paragraph" style:name="P527">
      <style:paragraph-properties fo:line-height="115%" fo:margin-left="0cm" fo:margin-right="0cm" fo:text-indent="0cm" fo:margin-top="0pt" fo:margin-bottom="0pt" fo:border="none"/>
      <style:text-properties/>
    </style:style>
    <style:style style:family="text" style:name="T937">
      <style:text-properties fo:color="#1f1f1f" fo:font-family="Arial" style:font-family-asian="Arial" style:font-family-complex="Arial" fo:font-size="12pt"/>
    </style:style>
    <style:style style:family="text" style:name="T938">
      <style:text-properties fo:color="#1f1f1f" fo:font-family="Arial" style:font-family-asian="Arial" style:font-family-complex="Arial" fo:font-size="12pt"/>
    </style:style>
    <style:style style:parent-style-name="142" style:family="paragraph" style:name="P52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39">
      <style:text-properties fo:color="#1f1f1f" fo:font-family="Arial" style:font-family-asian="Arial" style:font-family-complex="Arial" fo:font-size="12pt" fo:font-weight="bold"/>
    </style:style>
    <style:style style:family="paragraph" style:name="P529">
      <style:paragraph-properties fo:line-height="115%" fo:margin-left="0cm" fo:margin-right="0cm" fo:text-indent="0cm" fo:margin-top="0pt" fo:margin-bottom="0pt" fo:border="none"/>
      <style:text-properties/>
    </style:style>
    <style:style style:family="text" style:name="T940">
      <style:text-properties fo:color="#1f1f1f" fo:font-family="Arial" style:font-family-asian="Arial" style:font-family-complex="Arial" fo:font-size="12pt"/>
    </style:style>
    <style:style style:parent-style-name="668" style:list-style-name="WWNum27" style:family="paragraph" style:name="P530">
      <style:paragraph-properties fo:line-height="115%" fo:margin-right="0cm" fo:margin-top="0pt" fo:margin-bottom="0pt" fo:border="none"/>
      <style:text-properties/>
    </style:style>
    <style:style style:family="text" style:name="T941">
      <style:text-properties fo:color="#1f1f1f" fo:font-family="Arial" style:font-family-asian="Arial" style:font-family-complex="Arial" fo:font-size="12pt"/>
    </style:style>
    <style:style style:parent-style-name="668" style:list-style-name="WWNum27" style:family="paragraph" style:name="P531">
      <style:paragraph-properties fo:line-height="115%" fo:margin-right="0cm" fo:margin-top="0pt" fo:margin-bottom="0pt" fo:border="none"/>
      <style:text-properties/>
    </style:style>
    <style:style style:family="text" style:name="T942">
      <style:text-properties fo:color="#1f1f1f" fo:font-family="Arial" style:font-family-asian="Arial" style:font-family-complex="Arial" fo:font-size="12pt"/>
    </style:style>
    <style:style style:parent-style-name="668" style:list-style-name="WWNum27" style:family="paragraph" style:name="P532">
      <style:paragraph-properties fo:line-height="115%" fo:margin-right="0cm" fo:margin-top="0pt" fo:margin-bottom="0pt" fo:border="none"/>
      <style:text-properties/>
    </style:style>
    <style:style style:family="text" style:name="T943">
      <style:text-properties fo:color="#1f1f1f" fo:font-family="Arial" style:font-family-asian="Arial" style:font-family-complex="Arial" fo:font-size="12pt"/>
    </style:style>
    <style:style style:parent-style-name="142" style:family="paragraph" style:name="P53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44">
      <style:text-properties fo:color="#1f1f1f" fo:font-family="Arial" style:font-family-asian="Arial" style:font-family-complex="Arial" fo:font-size="12pt" fo:font-weight="bold"/>
    </style:style>
    <style:style style:family="table" style:name="ta6">
      <style:paragraph-properties fo:line-height="100%" fo:margin-bottom="0pt"/>
      <style:table-properties style:width="11.23cm" fo:margin-left="0cm" table:align="left" style:use-optimal-column-width="true"/>
    </style:style>
    <style:style style:family="table-column" style:name="co13">
      <style:table-column-properties style:column-width="2.011cm" style:use-optimal-column-width="true"/>
    </style:style>
    <style:style style:family="table-column" style:name="co14">
      <style:table-column-properties style:column-width="4.65cm" style:use-optimal-column-width="true"/>
    </style:style>
    <style:style style:family="table-column" style:name="co15">
      <style:table-column-properties style:column-width="4.572cm" style:use-optimal-column-width="true"/>
    </style:style>
    <style:style style:family="table-row" style:name="ro29">
      <style:table-row-properties/>
    </style:style>
    <style:style style:family="table-cell" style:name="ce7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34">
      <style:paragraph-properties style:line-height-at-least="12pt" fo:margin-top="0pt" fo:margin-bottom="0pt"/>
      <style:text-properties/>
    </style:style>
    <style:style style:family="text" style:name="T945">
      <style:text-properties fo:color="#1f1f1f" fo:font-family="Arial" style:font-family-asian="Arial" style:font-family-complex="Arial" fo:font-size="12pt" fo:font-weight="bold"/>
    </style:style>
    <style:style style:family="table-cell" style:name="ce7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35">
      <style:paragraph-properties style:line-height-at-least="12pt" fo:margin-top="0pt" fo:margin-bottom="0pt"/>
      <style:text-properties/>
    </style:style>
    <style:style style:family="text" style:name="T946">
      <style:text-properties fo:color="#1f1f1f" fo:font-family="Arial" style:font-family-asian="Arial" style:font-family-complex="Arial" fo:font-size="12pt" fo:font-weight="bold"/>
    </style:style>
    <style:style style:family="table-cell" style:name="ce7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36">
      <style:paragraph-properties style:line-height-at-least="12pt" fo:margin-top="0pt" fo:margin-bottom="0pt"/>
      <style:text-properties/>
    </style:style>
    <style:style style:family="text" style:name="T947">
      <style:text-properties fo:color="#1f1f1f" fo:font-family="Arial" style:font-family-asian="Arial" style:font-family-complex="Arial" fo:font-size="12pt" fo:font-weight="bold"/>
    </style:style>
    <style:style style:family="table-row" style:name="ro30">
      <style:table-row-properties/>
    </style:style>
    <style:style style:family="table-cell" style:name="ce7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37">
      <style:paragraph-properties style:line-height-at-least="12pt" fo:margin-top="0pt" fo:margin-bottom="0pt"/>
      <style:text-properties/>
    </style:style>
    <style:style style:family="text" style:name="T948">
      <style:text-properties fo:color="#1f1f1f" fo:font-family="Arial" style:font-family-asian="Arial" style:font-family-complex="Arial" fo:font-size="12pt"/>
    </style:style>
    <style:style style:family="table-cell" style:name="ce7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38">
      <style:paragraph-properties style:line-height-at-least="12pt" fo:margin-top="0pt" fo:margin-bottom="0pt"/>
      <style:text-properties/>
    </style:style>
    <style:style style:family="text" style:name="T949">
      <style:text-properties fo:color="#1f1f1f" fo:font-family="Arial" style:font-family-asian="Arial" style:font-family-complex="Arial" fo:font-size="12pt"/>
    </style:style>
    <style:style style:family="table-cell" style:name="ce7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39">
      <style:paragraph-properties style:line-height-at-least="12pt" fo:margin-top="0pt" fo:margin-bottom="0pt"/>
      <style:text-properties/>
    </style:style>
    <style:style style:family="text" style:name="T950">
      <style:text-properties fo:color="#1f1f1f" fo:font-family="Arial" style:font-family-asian="Arial" style:font-family-complex="Arial" fo:font-size="12pt"/>
    </style:style>
    <style:style style:family="table-row" style:name="ro31">
      <style:table-row-properties/>
    </style:style>
    <style:style style:family="table-cell" style:name="ce7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40">
      <style:paragraph-properties style:line-height-at-least="12pt" fo:margin-top="0pt" fo:margin-bottom="0pt"/>
      <style:text-properties/>
    </style:style>
    <style:style style:family="text" style:name="T951">
      <style:text-properties fo:color="#1f1f1f" fo:font-family="Arial" style:font-family-asian="Arial" style:font-family-complex="Arial" fo:font-size="12pt"/>
    </style:style>
    <style:style style:family="table-cell" style:name="ce8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41">
      <style:paragraph-properties style:line-height-at-least="12pt" fo:margin-top="0pt" fo:margin-bottom="0pt"/>
      <style:text-properties/>
    </style:style>
    <style:style style:family="text" style:name="T952">
      <style:text-properties fo:color="#1f1f1f" fo:font-family="Arial" style:font-family-asian="Arial" style:font-family-complex="Arial" fo:font-size="12pt"/>
    </style:style>
    <style:style style:family="table-cell" style:name="ce8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42">
      <style:paragraph-properties style:line-height-at-least="12pt" fo:margin-top="0pt" fo:margin-bottom="0pt"/>
      <style:text-properties/>
    </style:style>
    <style:style style:family="text" style:name="T953">
      <style:text-properties fo:color="#1f1f1f" fo:font-family="Arial" style:font-family-asian="Arial" style:font-family-complex="Arial" fo:font-size="12pt"/>
    </style:style>
    <style:style style:family="paragraph" style:name="P543">
      <style:paragraph-properties fo:line-height="115%" fo:margin-left="0cm" fo:margin-right="0cm" fo:text-indent="0cm" fo:margin-top="0pt" fo:margin-bottom="0pt" fo:border="none"/>
      <style:text-properties/>
    </style:style>
    <style:style style:family="text" style:name="T954">
      <style:text-properties fo:color="#1f1f1f" fo:font-family="Arial" style:font-family-asian="Arial" style:font-family-complex="Arial" fo:font-size="12pt"/>
    </style:style>
    <style:style style:parent-style-name="142" style:family="paragraph" style:name="P54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55">
      <style:text-properties fo:color="#1f1f1f" fo:font-family="Arial" style:font-family-asian="Arial" style:font-family-complex="Arial" fo:font-size="12pt" fo:font-weight="bold"/>
    </style:style>
    <style:style style:family="paragraph" style:name="P545">
      <style:paragraph-properties fo:line-height="115%" fo:margin-left="0cm" fo:margin-right="0cm" fo:text-indent="0cm" fo:margin-top="0pt" fo:margin-bottom="0pt" fo:border="none"/>
      <style:text-properties/>
    </style:style>
    <style:style style:family="text" style:name="T956">
      <style:text-properties fo:color="#1f1f1f" fo:font-family="Arial" style:font-family-asian="Arial" style:font-family-complex="Arial" fo:font-size="12pt"/>
    </style:style>
    <style:style style:parent-style-name="141" style:family="paragraph" style:name="P54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57">
      <style:text-properties fo:color="#1f1f1f" fo:font-family="Arial" style:font-family-asian="Arial" style:font-family-complex="Arial" fo:font-size="14pt" fo:font-weight="bold"/>
    </style:style>
    <style:style style:parent-style-name="668" style:list-style-name="WWNum27" style:family="paragraph" style:name="P547">
      <style:paragraph-properties fo:line-height="115%" fo:margin-right="0cm" fo:margin-top="0pt" fo:margin-bottom="0pt" fo:border="none"/>
      <style:text-properties/>
    </style:style>
    <style:style style:family="text" style:name="T958">
      <style:text-properties fo:color="#1f1f1f" fo:font-family="Arial" style:font-family-asian="Arial" style:font-family-complex="Arial" fo:font-size="12pt"/>
    </style:style>
    <style:style style:parent-style-name="668" style:list-style-name="WWNum27" style:family="paragraph" style:name="P548">
      <style:paragraph-properties fo:line-height="115%" fo:margin-right="0cm" fo:margin-top="0pt" fo:margin-bottom="0pt" fo:border="none"/>
      <style:text-properties/>
    </style:style>
    <style:style style:family="text" style:name="T959">
      <style:text-properties fo:color="#1f1f1f" fo:font-family="Arial" style:font-family-asian="Arial" style:font-family-complex="Arial" fo:font-size="12pt"/>
    </style:style>
    <style:style style:parent-style-name="668" style:list-style-name="WWNum27" style:family="paragraph" style:name="P549">
      <style:paragraph-properties fo:line-height="115%" fo:margin-right="0cm" fo:margin-top="0pt" fo:margin-bottom="0pt" fo:border="none"/>
      <style:text-properties/>
    </style:style>
    <style:style style:family="text" style:name="T960">
      <style:text-properties fo:color="#1f1f1f" fo:font-family="Arial" style:font-family-asian="Arial" style:font-family-complex="Arial" fo:font-size="12pt"/>
    </style:style>
    <style:style style:parent-style-name="668" style:list-style-name="WWNum27" style:family="paragraph" style:name="P550">
      <style:paragraph-properties fo:line-height="115%" fo:margin-right="0cm" fo:margin-top="0pt" fo:margin-bottom="0pt" fo:border="none"/>
      <style:text-properties/>
    </style:style>
    <style:style style:family="text" style:name="T961">
      <style:text-properties fo:color="#1f1f1f" fo:font-family="Arial" style:font-family-asian="Arial" style:font-family-complex="Arial" fo:font-size="12pt"/>
    </style:style>
    <style:style style:family="paragraph" style:name="P551">
      <style:paragraph-properties/>
      <style:text-properties fo:font-family="Arial" style:font-family-asian="Arial" style:font-family-complex="Arial" fo:font-size="12pt" style:font-size-complex="12pt"/>
    </style:style>
    <style:style style:family="text" style:name="T962">
      <style:text-properties/>
    </style:style>
    <style:style style:family="text" style:name="T963">
      <style:text-properties/>
    </style:style>
    <style:style style:family="text" style:name="T964">
      <style:text-properties/>
    </style:style>
    <style:style style:family="paragraph" style:name="P552">
      <style:paragraph-properties fo:line-height="115%" fo:margin-left="0cm" fo:margin-right="0cm" fo:text-indent="0cm" fo:margin-top="0pt" fo:margin-bottom="0pt" fo:break-before="page" fo:border="none"/>
      <style:text-properties/>
    </style:style>
    <style:style style:family="text" style:name="T965">
      <style:text-properties fo:color="#1f1f1f" fo:font-family="Arial" style:font-family-asian="Arial" style:font-family-complex="Arial" fo:font-size="12pt"/>
    </style:style>
    <style:style style:parent-style-name="141" style:family="paragraph" style:name="P55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66">
      <style:text-properties fo:color="#1f1f1f" fo:font-family="Arial" style:font-family-asian="Arial" style:font-family-complex="Arial" fo:font-size="14pt" fo:font-weight="bold"/>
    </style:style>
    <style:style style:family="paragraph" style:name="P554">
      <style:paragraph-properties fo:line-height="115%" fo:margin-left="0cm" fo:margin-right="0cm" fo:text-indent="0cm" fo:margin-top="0pt" fo:margin-bottom="0pt" fo:border="none"/>
      <style:text-properties/>
    </style:style>
    <style:style style:family="text" style:name="T967">
      <style:text-properties fo:color="#1f1f1f" fo:font-family="Arial" style:font-family-asian="Arial" style:font-family-complex="Arial" fo:font-size="12pt"/>
    </style:style>
    <style:style style:parent-style-name="142" style:family="paragraph" style:name="P55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68">
      <style:text-properties fo:color="#1f1f1f" fo:font-family="Arial" style:font-family-asian="Arial" style:font-family-complex="Arial" fo:font-size="12pt" fo:font-weight="bold"/>
    </style:style>
    <style:style style:family="paragraph" style:name="P556">
      <style:paragraph-properties fo:line-height="115%" fo:margin-left="0cm" fo:margin-right="0cm" fo:text-indent="0cm" fo:margin-top="0pt" fo:margin-bottom="0pt" fo:border="none"/>
      <style:text-properties/>
    </style:style>
    <style:style style:family="text" style:name="T969">
      <style:text-properties fo:color="#1f1f1f" fo:font-family="Arial" style:font-family-asian="Arial" style:font-family-complex="Arial" fo:font-size="12pt"/>
    </style:style>
    <style:style style:family="text" style:name="T970">
      <style:text-properties fo:color="#1f1f1f" fo:font-family="Arial" style:font-family-asian="Arial" style:font-family-complex="Arial" fo:font-size="12pt"/>
    </style:style>
    <style:style style:parent-style-name="142" style:family="paragraph" style:name="P55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71">
      <style:text-properties fo:color="#1f1f1f" fo:font-family="Arial" style:font-family-asian="Arial" style:font-family-complex="Arial" fo:font-size="12pt" fo:font-weight="bold"/>
    </style:style>
    <style:style style:family="paragraph" style:name="P558">
      <style:paragraph-properties fo:line-height="115%" fo:margin-left="0cm" fo:margin-right="0cm" fo:text-indent="0cm" fo:margin-top="0pt" fo:margin-bottom="0pt" fo:border="none"/>
      <style:text-properties/>
    </style:style>
    <style:style style:family="text" style:name="T972">
      <style:text-properties fo:color="#1f1f1f" fo:font-family="Arial" style:font-family-asian="Arial" style:font-family-complex="Arial" fo:font-size="12pt"/>
    </style:style>
    <style:style style:family="text" style:name="T973">
      <style:text-properties fo:color="#1f1f1f" fo:font-family="Arial" style:font-family-asian="Arial" style:font-family-complex="Arial" fo:font-size="12pt"/>
    </style:style>
    <style:style style:parent-style-name="142" style:family="paragraph" style:name="P55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74">
      <style:text-properties fo:color="#1f1f1f" fo:font-family="Arial" style:font-family-asian="Arial" style:font-family-complex="Arial" fo:font-size="12pt" fo:font-weight="bold"/>
    </style:style>
    <style:style style:family="paragraph" style:name="P560">
      <style:paragraph-properties fo:line-height="115%" fo:margin-left="0cm" fo:margin-right="0cm" fo:text-indent="0cm" fo:margin-top="0pt" fo:margin-bottom="0pt" fo:border="none"/>
      <style:text-properties/>
    </style:style>
    <style:style style:family="text" style:name="T975">
      <style:text-properties fo:color="#1f1f1f" fo:font-family="Arial" style:font-family-asian="Arial" style:font-family-complex="Arial" fo:font-size="12pt"/>
    </style:style>
    <style:style style:family="text" style:name="T976">
      <style:text-properties fo:color="#1f1f1f" fo:font-family="Arial" style:font-family-asian="Arial" style:font-family-complex="Arial" fo:font-size="12pt"/>
    </style:style>
    <style:style style:parent-style-name="142" style:family="paragraph" style:name="P56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77">
      <style:text-properties fo:color="#1f1f1f" fo:font-family="Arial" style:font-family-asian="Arial" style:font-family-complex="Arial" fo:font-size="12pt" fo:font-weight="bold"/>
    </style:style>
    <style:style style:family="paragraph" style:name="P562">
      <style:paragraph-properties fo:line-height="115%" fo:margin-left="0cm" fo:margin-right="0cm" fo:text-indent="0cm" fo:margin-top="0pt" fo:margin-bottom="0pt" fo:border="none"/>
      <style:text-properties/>
    </style:style>
    <style:style style:family="text" style:name="T978">
      <style:text-properties fo:color="#1f1f1f" fo:font-family="Arial" style:font-family-asian="Arial" style:font-family-complex="Arial" fo:font-size="12pt"/>
    </style:style>
    <style:style style:family="text" style:name="T979">
      <style:text-properties fo:color="#1f1f1f" fo:font-family="Arial" style:font-family-asian="Arial" style:font-family-complex="Arial" fo:font-size="12pt"/>
    </style:style>
    <style:style style:parent-style-name="141" style:family="paragraph" style:name="P56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80">
      <style:text-properties fo:color="#1f1f1f" fo:font-family="Arial" style:font-family-asian="Arial" style:font-family-complex="Arial" fo:font-size="14pt" fo:font-weight="bold"/>
    </style:style>
    <style:style style:parent-style-name="668" style:list-style-name="WWNum28" style:family="paragraph" style:name="P564">
      <style:paragraph-properties fo:line-height="115%" fo:margin-right="0cm" fo:margin-top="0pt" fo:margin-bottom="0pt" fo:border="none"/>
      <style:text-properties/>
    </style:style>
    <style:style style:family="text" style:name="T981">
      <style:text-properties fo:color="#1f1f1f" fo:font-family="Arial" style:font-family-asian="Arial" style:font-family-complex="Arial" fo:font-size="12pt"/>
    </style:style>
    <style:style style:parent-style-name="668" style:list-style-name="WWNum28" style:family="paragraph" style:name="P565">
      <style:paragraph-properties fo:line-height="115%" fo:margin-right="0cm" fo:margin-top="0pt" fo:margin-bottom="0pt" fo:border="none"/>
      <style:text-properties/>
    </style:style>
    <style:style style:family="text" style:name="T982">
      <style:text-properties fo:color="#1f1f1f" fo:font-family="Arial" style:font-family-asian="Arial" style:font-family-complex="Arial" fo:font-size="12pt"/>
    </style:style>
    <style:style style:parent-style-name="668" style:list-style-name="WWNum28" style:family="paragraph" style:name="P566">
      <style:paragraph-properties fo:line-height="115%" fo:margin-right="0cm" fo:margin-top="0pt" fo:margin-bottom="0pt" fo:border="none"/>
      <style:text-properties/>
    </style:style>
    <style:style style:family="text" style:name="T983">
      <style:text-properties fo:color="#1f1f1f" fo:font-family="Arial" style:font-family-asian="Arial" style:font-family-complex="Arial" fo:font-size="12pt"/>
    </style:style>
    <style:style style:parent-style-name="668" style:list-style-name="WWNum28" style:family="paragraph" style:name="P567">
      <style:paragraph-properties fo:line-height="115%" fo:margin-right="0cm" fo:margin-top="0pt" fo:margin-bottom="0pt" fo:border="none"/>
      <style:text-properties/>
    </style:style>
    <style:style style:family="text" style:name="T984">
      <style:text-properties fo:color="#1f1f1f" fo:font-family="Arial" style:font-family-asian="Arial" style:font-family-complex="Arial" fo:font-size="12pt"/>
    </style:style>
    <style:style style:family="paragraph" style:name="P568">
      <style:paragraph-properties/>
      <style:text-properties fo:font-family="Arial" style:font-family-asian="Arial" style:font-family-complex="Arial" fo:font-size="12pt" style:font-size-complex="12pt"/>
    </style:style>
    <style:style style:family="text" style:name="T985">
      <style:text-properties/>
    </style:style>
    <style:style style:family="text" style:name="T986">
      <style:text-properties/>
    </style:style>
    <style:style style:family="text" style:name="T987">
      <style:text-properties/>
    </style:style>
    <style:style style:family="paragraph" style:name="P569">
      <style:paragraph-properties fo:line-height="115%" fo:margin-left="0cm" fo:margin-right="0cm" fo:text-indent="0cm" fo:margin-top="0pt" fo:margin-bottom="0pt" fo:break-before="page" fo:border="none"/>
      <style:text-properties/>
    </style:style>
    <style:style style:family="text" style:name="T988">
      <style:text-properties fo:color="#1f1f1f" fo:font-family="Arial" style:font-family-asian="Arial" style:font-family-complex="Arial" fo:font-size="12pt"/>
    </style:style>
    <style:style style:parent-style-name="141" style:family="paragraph" style:name="P57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89">
      <style:text-properties fo:color="#1f1f1f" fo:font-family="Arial" style:font-family-asian="Arial" style:font-family-complex="Arial" fo:font-size="14pt" fo:font-weight="bold"/>
    </style:style>
    <style:style style:family="paragraph" style:name="P571">
      <style:paragraph-properties fo:line-height="115%" fo:margin-left="0cm" fo:margin-right="0cm" fo:text-indent="0cm" fo:margin-top="0pt" fo:margin-bottom="0pt" fo:border="none"/>
      <style:text-properties/>
    </style:style>
    <style:style style:family="text" style:name="T990">
      <style:text-properties fo:color="#1f1f1f" fo:font-family="Arial" style:font-family-asian="Arial" style:font-family-complex="Arial" fo:font-size="12pt"/>
    </style:style>
    <style:style style:parent-style-name="142" style:family="paragraph" style:name="P57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91">
      <style:text-properties fo:color="#1f1f1f" fo:font-family="Arial" style:font-family-asian="Arial" style:font-family-complex="Arial" fo:font-size="12pt" fo:font-weight="bold"/>
    </style:style>
    <style:style style:family="paragraph" style:name="P573">
      <style:paragraph-properties fo:line-height="115%" fo:margin-left="0cm" fo:margin-right="0cm" fo:text-indent="0cm" fo:margin-top="0pt" fo:margin-bottom="0pt" fo:border="none"/>
      <style:text-properties/>
    </style:style>
    <style:style style:family="text" style:name="T992">
      <style:text-properties fo:color="#1f1f1f" fo:font-family="Arial" style:font-family-asian="Arial" style:font-family-complex="Arial" fo:font-size="12pt"/>
    </style:style>
    <style:style style:family="text" style:name="T993">
      <style:text-properties fo:color="#1f1f1f" fo:font-family="Arial" style:font-family-asian="Arial" style:font-family-complex="Arial" fo:font-size="12pt"/>
    </style:style>
    <style:style style:parent-style-name="142" style:family="paragraph" style:name="P57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94">
      <style:text-properties fo:color="#1f1f1f" fo:font-family="Arial" style:font-family-asian="Arial" style:font-family-complex="Arial" fo:font-size="12pt" fo:font-weight="bold"/>
    </style:style>
    <style:style style:family="paragraph" style:name="P575">
      <style:paragraph-properties fo:line-height="115%" fo:margin-left="0cm" fo:margin-right="0cm" fo:text-indent="0cm" fo:margin-top="0pt" fo:margin-bottom="0pt" fo:border="none"/>
      <style:text-properties/>
    </style:style>
    <style:style style:family="text" style:name="T995">
      <style:text-properties fo:color="#1f1f1f" fo:font-family="Arial" style:font-family-asian="Arial" style:font-family-complex="Arial" fo:font-size="12pt"/>
    </style:style>
    <style:style style:family="text" style:name="T996">
      <style:text-properties fo:color="#1f1f1f" fo:font-family="Arial" style:font-family-asian="Arial" style:font-family-complex="Arial" fo:font-size="12pt"/>
    </style:style>
    <style:style style:parent-style-name="142" style:family="paragraph" style:name="P57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97">
      <style:text-properties fo:color="#1f1f1f" fo:font-family="Arial" style:font-family-asian="Arial" style:font-family-complex="Arial" fo:font-size="12pt" fo:font-weight="bold"/>
    </style:style>
    <style:style style:family="paragraph" style:name="P577">
      <style:paragraph-properties fo:line-height="115%" fo:margin-left="0cm" fo:margin-right="0cm" fo:text-indent="0cm" fo:margin-top="0pt" fo:margin-bottom="0pt" fo:border="none"/>
      <style:text-properties/>
    </style:style>
    <style:style style:family="text" style:name="T998">
      <style:text-properties fo:color="#1f1f1f" fo:font-family="Arial" style:font-family-asian="Arial" style:font-family-complex="Arial" fo:font-size="12pt"/>
    </style:style>
    <style:style style:parent-style-name="142" style:family="paragraph" style:name="P57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99">
      <style:text-properties fo:color="#1f1f1f" fo:font-family="Arial" style:font-family-asian="Arial" style:font-family-complex="Arial" fo:font-size="12pt" fo:font-weight="bold"/>
    </style:style>
    <style:style style:family="paragraph" style:name="P579">
      <style:paragraph-properties fo:line-height="115%" fo:margin-left="0cm" fo:margin-right="0cm" fo:text-indent="0cm" fo:margin-top="0pt" fo:margin-bottom="0pt" fo:border="none"/>
      <style:text-properties/>
    </style:style>
    <style:style style:family="text" style:name="T1000">
      <style:text-properties fo:color="#1f1f1f" fo:font-family="Arial" style:font-family-asian="Arial" style:font-family-complex="Arial" fo:font-size="12pt"/>
    </style:style>
    <style:style style:family="text" style:name="T1001">
      <style:text-properties fo:color="#1f1f1f" fo:font-family="Arial" style:font-family-asian="Arial" style:font-family-complex="Arial" fo:font-size="12pt"/>
    </style:style>
    <style:style style:parent-style-name="141" style:family="paragraph" style:name="P58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02">
      <style:text-properties fo:color="#1f1f1f" fo:font-family="Arial" style:font-family-asian="Arial" style:font-family-complex="Arial" fo:font-size="14pt" fo:font-weight="bold"/>
    </style:style>
    <style:style style:parent-style-name="668" style:list-style-name="WWNum29" style:family="paragraph" style:name="P581">
      <style:paragraph-properties fo:line-height="115%" fo:margin-right="0cm" fo:margin-top="0pt" fo:margin-bottom="0pt" fo:border="none"/>
      <style:text-properties/>
    </style:style>
    <style:style style:family="text" style:name="T1003">
      <style:text-properties fo:color="#1f1f1f" fo:font-family="Arial" style:font-family-asian="Arial" style:font-family-complex="Arial" fo:font-size="12pt"/>
    </style:style>
    <style:style style:parent-style-name="668" style:list-style-name="WWNum29" style:family="paragraph" style:name="P582">
      <style:paragraph-properties fo:line-height="115%" fo:margin-right="0cm" fo:margin-top="0pt" fo:margin-bottom="0pt" fo:border="none"/>
      <style:text-properties/>
    </style:style>
    <style:style style:family="text" style:name="T1004">
      <style:text-properties fo:color="#1f1f1f" fo:font-family="Arial" style:font-family-asian="Arial" style:font-family-complex="Arial" fo:font-size="12pt"/>
    </style:style>
    <style:style style:parent-style-name="668" style:list-style-name="WWNum29" style:family="paragraph" style:name="P583">
      <style:paragraph-properties fo:line-height="115%" fo:margin-right="0cm" fo:margin-top="0pt" fo:margin-bottom="0pt" fo:border="none"/>
      <style:text-properties/>
    </style:style>
    <style:style style:family="text" style:name="T1005">
      <style:text-properties fo:color="#1f1f1f" fo:font-family="Arial" style:font-family-asian="Arial" style:font-family-complex="Arial" fo:font-size="12pt"/>
    </style:style>
    <style:style style:parent-style-name="668" style:list-style-name="WWNum29" style:family="paragraph" style:name="P584">
      <style:paragraph-properties fo:line-height="115%" fo:margin-right="0cm" fo:margin-top="0pt" fo:margin-bottom="0pt" fo:border="none"/>
      <style:text-properties/>
    </style:style>
    <style:style style:family="text" style:name="T1006">
      <style:text-properties fo:color="#1f1f1f" fo:font-family="Arial" style:font-family-asian="Arial" style:font-family-complex="Arial" fo:font-size="12pt"/>
    </style:style>
    <style:style style:family="paragraph" style:name="P585">
      <style:paragraph-properties/>
      <style:text-properties fo:font-family="Arial" style:font-family-asian="Arial" style:font-family-complex="Arial" fo:font-size="12pt" style:font-size-complex="12pt"/>
    </style:style>
    <style:style style:family="text" style:name="T1007">
      <style:text-properties/>
    </style:style>
    <style:style style:family="text" style:name="T1008">
      <style:text-properties/>
    </style:style>
    <style:style style:family="text" style:name="T1009">
      <style:text-properties/>
    </style:style>
    <style:style style:family="paragraph" style:name="P586">
      <style:paragraph-properties fo:line-height="115%" fo:margin-left="0cm" fo:margin-right="0cm" fo:text-indent="0cm" fo:margin-top="0pt" fo:margin-bottom="0pt" fo:break-before="page" fo:border="none"/>
      <style:text-properties/>
    </style:style>
    <style:style style:family="text" style:name="T1010">
      <style:text-properties fo:color="#1f1f1f" fo:font-family="Arial" style:font-family-asian="Arial" style:font-family-complex="Arial" fo:font-size="12pt"/>
    </style:style>
    <style:style style:parent-style-name="141" style:family="paragraph" style:name="P58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11">
      <style:text-properties fo:color="#1f1f1f" fo:font-family="Arial" style:font-family-asian="Arial" style:font-family-complex="Arial" fo:font-size="14pt" fo:font-weight="bold"/>
    </style:style>
    <style:style style:family="paragraph" style:name="P588">
      <style:paragraph-properties fo:line-height="115%" fo:margin-left="0cm" fo:margin-right="0cm" fo:text-indent="0cm" fo:margin-top="0pt" fo:margin-bottom="0pt" fo:border="none"/>
      <style:text-properties/>
    </style:style>
    <style:style style:family="text" style:name="T1012">
      <style:text-properties fo:color="#1f1f1f" fo:font-family="Arial" style:font-family-asian="Arial" style:font-family-complex="Arial" fo:font-size="12pt"/>
    </style:style>
    <style:style style:parent-style-name="142" style:family="paragraph" style:name="P58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13">
      <style:text-properties fo:color="#1f1f1f" fo:font-family="Arial" style:font-family-asian="Arial" style:font-family-complex="Arial" fo:font-size="12pt" fo:font-weight="bold"/>
    </style:style>
    <style:style style:family="paragraph" style:name="P590">
      <style:paragraph-properties fo:line-height="115%" fo:margin-left="0cm" fo:margin-right="0cm" fo:text-indent="0cm" fo:margin-top="0pt" fo:margin-bottom="0pt" fo:border="none"/>
      <style:text-properties/>
    </style:style>
    <style:style style:family="text" style:name="T1014">
      <style:text-properties fo:color="#1f1f1f" fo:font-family="Arial" style:font-family-asian="Arial" style:font-family-complex="Arial" fo:font-size="12pt"/>
    </style:style>
    <style:style style:parent-style-name="142" style:family="paragraph" style:name="P59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15">
      <style:text-properties fo:color="#1f1f1f" fo:font-family="Arial" style:font-family-asian="Arial" style:font-family-complex="Arial" fo:font-size="12pt" fo:font-weight="bold"/>
    </style:style>
    <style:style style:family="paragraph" style:name="P592">
      <style:paragraph-properties fo:line-height="115%" fo:margin-left="0cm" fo:margin-right="0cm" fo:text-indent="0cm" fo:margin-top="0pt" fo:margin-bottom="0pt" fo:border="none"/>
      <style:text-properties/>
    </style:style>
    <style:style style:family="text" style:name="T1016">
      <style:text-properties fo:color="#1f1f1f" fo:font-family="Arial" style:font-family-asian="Arial" style:font-family-complex="Arial" fo:font-size="12pt"/>
    </style:style>
    <style:style style:parent-style-name="142" style:family="paragraph" style:name="P59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17">
      <style:text-properties fo:color="#1f1f1f" fo:font-family="Arial" style:font-family-asian="Arial" style:font-family-complex="Arial" fo:font-size="12pt" fo:font-weight="bold"/>
    </style:style>
    <style:style style:family="paragraph" style:name="P594">
      <style:paragraph-properties fo:line-height="115%" fo:margin-left="0cm" fo:margin-right="0cm" fo:text-indent="0cm" fo:margin-top="0pt" fo:margin-bottom="0pt" fo:border="none"/>
      <style:text-properties/>
    </style:style>
    <style:style style:family="text" style:name="T1018">
      <style:text-properties fo:color="#1f1f1f" fo:font-family="Arial" style:font-family-asian="Arial" style:font-family-complex="Arial" fo:font-size="12pt"/>
    </style:style>
    <style:style style:parent-style-name="142" style:family="paragraph" style:name="P59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19">
      <style:text-properties fo:color="#1f1f1f" fo:font-family="Arial" style:font-family-asian="Arial" style:font-family-complex="Arial" fo:font-size="12pt" fo:font-weight="bold"/>
    </style:style>
    <style:style style:family="paragraph" style:name="P596">
      <style:paragraph-properties fo:line-height="115%" fo:margin-left="0cm" fo:margin-right="0cm" fo:text-indent="0cm" fo:margin-top="0pt" fo:margin-bottom="0pt" fo:border="none"/>
      <style:text-properties/>
    </style:style>
    <style:style style:family="text" style:name="T1020">
      <style:text-properties fo:color="#1f1f1f" fo:font-family="Arial" style:font-family-asian="Arial" style:font-family-complex="Arial" fo:font-size="12pt"/>
    </style:style>
    <style:style style:parent-style-name="141" style:family="paragraph" style:name="P59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21">
      <style:text-properties fo:color="#1f1f1f" fo:font-family="Arial" style:font-family-asian="Arial" style:font-family-complex="Arial" fo:font-size="14pt" fo:font-weight="bold"/>
    </style:style>
    <style:style style:parent-style-name="668" style:list-style-name="WWNum30" style:family="paragraph" style:name="P598">
      <style:paragraph-properties fo:line-height="115%" fo:margin-right="0cm" fo:margin-top="0pt" fo:margin-bottom="0pt" fo:border="none"/>
      <style:text-properties/>
    </style:style>
    <style:style style:family="text" style:name="T1022">
      <style:text-properties fo:color="#1f1f1f" fo:font-family="Arial" style:font-family-asian="Arial" style:font-family-complex="Arial" fo:font-size="12pt"/>
    </style:style>
    <style:style style:parent-style-name="668" style:list-style-name="WWNum30" style:family="paragraph" style:name="P599">
      <style:paragraph-properties fo:line-height="115%" fo:margin-right="0cm" fo:margin-top="0pt" fo:margin-bottom="0pt" fo:border="none"/>
      <style:text-properties/>
    </style:style>
    <style:style style:family="text" style:name="T1023">
      <style:text-properties fo:color="#1f1f1f" fo:font-family="Arial" style:font-family-asian="Arial" style:font-family-complex="Arial" fo:font-size="12pt"/>
    </style:style>
    <style:style style:parent-style-name="668" style:list-style-name="WWNum30" style:family="paragraph" style:name="P600">
      <style:paragraph-properties fo:line-height="115%" fo:margin-right="0cm" fo:margin-top="0pt" fo:margin-bottom="0pt" fo:border="none"/>
      <style:text-properties/>
    </style:style>
    <style:style style:family="text" style:name="T1024">
      <style:text-properties fo:color="#1f1f1f" fo:font-family="Arial" style:font-family-asian="Arial" style:font-family-complex="Arial" fo:font-size="12pt"/>
    </style:style>
    <style:style style:parent-style-name="668" style:list-style-name="WWNum30" style:family="paragraph" style:name="P601">
      <style:paragraph-properties fo:line-height="115%" fo:margin-right="0cm" fo:margin-top="0pt" fo:margin-bottom="0pt" fo:border="none"/>
      <style:text-properties/>
    </style:style>
    <style:style style:family="text" style:name="T1025">
      <style:text-properties fo:color="#1f1f1f" fo:font-family="Arial" style:font-family-asian="Arial" style:font-family-complex="Arial" fo:font-size="12pt"/>
    </style:style>
    <style:style style:family="paragraph" style:name="P602">
      <style:paragraph-properties/>
      <style:text-properties fo:font-family="Arial" style:font-family-asian="Arial" style:font-family-complex="Arial" fo:font-size="12pt" style:font-size-complex="12pt"/>
    </style:style>
    <style:style style:family="text" style:name="T1026">
      <style:text-properties/>
    </style:style>
    <style:style style:family="text" style:name="T1027">
      <style:text-properties/>
    </style:style>
    <style:style style:family="text" style:name="T1028">
      <style:text-properties/>
    </style:style>
    <style:style style:parent-style-name="141" style:family="paragraph" style:name="P60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029">
      <style:text-properties fo:color="#1f1f1f" fo:font-family="Arial" style:font-family-asian="Arial" style:font-family-complex="Arial" fo:font-size="14pt" fo:font-weight="bold"/>
    </style:style>
    <style:style style:family="paragraph" style:name="P604">
      <style:paragraph-properties fo:line-height="115%" fo:margin-left="0cm" fo:margin-right="0cm" fo:text-indent="0cm" fo:margin-top="0pt" fo:margin-bottom="0pt" fo:border="none"/>
      <style:text-properties/>
    </style:style>
    <style:style style:family="text" style:name="T1030">
      <style:text-properties fo:color="#1f1f1f" fo:font-family="Arial" style:font-family-asian="Arial" style:font-family-complex="Arial" fo:font-size="12pt"/>
    </style:style>
    <style:style style:parent-style-name="142" style:family="paragraph" style:name="P60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31">
      <style:text-properties fo:color="#1f1f1f" fo:font-family="Arial" style:font-family-asian="Arial" style:font-family-complex="Arial" fo:font-size="12pt" fo:font-weight="bold"/>
    </style:style>
    <style:style style:family="paragraph" style:name="P606">
      <style:paragraph-properties fo:line-height="115%" fo:margin-left="0cm" fo:margin-right="0cm" fo:text-indent="0cm" fo:margin-top="0pt" fo:margin-bottom="0pt" fo:border="none"/>
      <style:text-properties/>
    </style:style>
    <style:style style:family="text" style:name="T1032">
      <style:text-properties fo:color="#1f1f1f" fo:font-family="Arial" style:font-family-asian="Arial" style:font-family-complex="Arial" fo:font-size="12pt"/>
    </style:style>
    <style:style style:parent-style-name="142" style:family="paragraph" style:name="P60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33">
      <style:text-properties fo:color="#1f1f1f" fo:font-family="Arial" style:font-family-asian="Arial" style:font-family-complex="Arial" fo:font-size="12pt" fo:font-weight="bold"/>
    </style:style>
    <style:style style:family="paragraph" style:name="P608">
      <style:paragraph-properties fo:line-height="115%" fo:margin-left="0cm" fo:margin-right="0cm" fo:text-indent="0cm" fo:margin-top="0pt" fo:margin-bottom="0pt" fo:border="none"/>
      <style:text-properties/>
    </style:style>
    <style:style style:family="text" style:name="T1034">
      <style:text-properties fo:color="#1f1f1f" fo:font-family="Arial" style:font-family-asian="Arial" style:font-family-complex="Arial" fo:font-size="12pt"/>
    </style:style>
    <style:style style:family="text" style:name="T1035">
      <style:text-properties fo:color="#1f1f1f" fo:font-family="Arial" style:font-family-asian="Arial" style:font-family-complex="Arial" fo:font-size="12pt"/>
    </style:style>
    <style:style style:parent-style-name="142" style:family="paragraph" style:name="P60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36">
      <style:text-properties fo:color="#1f1f1f" fo:font-family="Arial" style:font-family-asian="Arial" style:font-family-complex="Arial" fo:font-size="12pt" fo:font-weight="bold"/>
    </style:style>
    <style:style style:family="paragraph" style:name="P610">
      <style:paragraph-properties fo:line-height="115%" fo:margin-left="0cm" fo:margin-right="0cm" fo:text-indent="0cm" fo:margin-top="0pt" fo:margin-bottom="0pt" fo:border="none"/>
      <style:text-properties/>
    </style:style>
    <style:style style:family="text" style:name="T1037">
      <style:text-properties fo:color="#1f1f1f" fo:font-family="Arial" style:font-family-asian="Arial" style:font-family-complex="Arial" fo:font-size="12pt"/>
    </style:style>
    <style:style style:family="text" style:name="T1038">
      <style:text-properties fo:color="#1f1f1f" fo:font-family="Arial" style:font-family-asian="Arial" style:font-family-complex="Arial" fo:font-size="12pt"/>
    </style:style>
    <style:style style:parent-style-name="142" style:family="paragraph" style:name="P61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39">
      <style:text-properties fo:color="#1f1f1f" fo:font-family="Arial" style:font-family-asian="Arial" style:font-family-complex="Arial" fo:font-size="12pt" fo:font-weight="bold"/>
    </style:style>
    <style:style style:family="paragraph" style:name="P612">
      <style:paragraph-properties fo:line-height="115%" fo:margin-left="0cm" fo:margin-right="0cm" fo:text-indent="0cm" fo:margin-top="0pt" fo:margin-bottom="0pt" fo:border="none"/>
      <style:text-properties/>
    </style:style>
    <style:style style:family="text" style:name="T1040">
      <style:text-properties fo:color="#1f1f1f" fo:font-family="Arial" style:font-family-asian="Arial" style:font-family-complex="Arial" fo:font-size="12pt"/>
    </style:style>
    <style:style style:parent-style-name="141" style:family="paragraph" style:name="P61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41">
      <style:text-properties fo:color="#1f1f1f" fo:font-family="Arial" style:font-family-asian="Arial" style:font-family-complex="Arial" fo:font-size="14pt" fo:font-weight="bold"/>
    </style:style>
    <style:style style:parent-style-name="668" style:list-style-name="WWNum31" style:family="paragraph" style:name="P614">
      <style:paragraph-properties fo:line-height="115%" fo:margin-right="0cm" fo:margin-top="0pt" fo:margin-bottom="0pt" fo:border="none"/>
      <style:text-properties/>
    </style:style>
    <style:style style:family="text" style:name="T1042">
      <style:text-properties fo:color="#1f1f1f" fo:font-family="Arial" style:font-family-asian="Arial" style:font-family-complex="Arial" fo:font-size="12pt"/>
    </style:style>
    <style:style style:parent-style-name="668" style:list-style-name="WWNum31" style:family="paragraph" style:name="P615">
      <style:paragraph-properties fo:line-height="115%" fo:margin-right="0cm" fo:margin-top="0pt" fo:margin-bottom="0pt" fo:border="none"/>
      <style:text-properties/>
    </style:style>
    <style:style style:family="text" style:name="T1043">
      <style:text-properties fo:color="#1f1f1f" fo:font-family="Arial" style:font-family-asian="Arial" style:font-family-complex="Arial" fo:font-size="12pt"/>
    </style:style>
    <style:style style:parent-style-name="668" style:list-style-name="WWNum31" style:family="paragraph" style:name="P616">
      <style:paragraph-properties fo:line-height="115%" fo:margin-right="0cm" fo:margin-top="0pt" fo:margin-bottom="0pt" fo:border="none"/>
      <style:text-properties/>
    </style:style>
    <style:style style:family="text" style:name="T1044">
      <style:text-properties fo:color="#1f1f1f" fo:font-family="Arial" style:font-family-asian="Arial" style:font-family-complex="Arial" fo:font-size="12pt"/>
    </style:style>
    <style:style style:parent-style-name="668" style:list-style-name="WWNum31" style:family="paragraph" style:name="P617">
      <style:paragraph-properties fo:line-height="115%" fo:margin-right="0cm" fo:margin-top="0pt" fo:margin-bottom="0pt" fo:border="none"/>
      <style:text-properties/>
    </style:style>
    <style:style style:family="text" style:name="T1045">
      <style:text-properties fo:color="#1f1f1f" fo:font-family="Arial" style:font-family-asian="Arial" style:font-family-complex="Arial" fo:font-size="12pt"/>
    </style:style>
    <style:style style:family="paragraph" style:name="P618">
      <style:paragraph-properties/>
      <style:text-properties fo:font-family="Arial" style:font-family-asian="Arial" style:font-family-complex="Arial" fo:font-size="12pt" style:font-size-complex="12pt"/>
    </style:style>
    <style:style style:family="text" style:name="T1046">
      <style:text-properties/>
    </style:style>
    <style:style style:family="text" style:name="T1047">
      <style:text-properties/>
    </style:style>
    <style:style style:family="text" style:name="T1048">
      <style:text-properties/>
    </style:style>
    <style:style style:parent-style-name="141" style:family="paragraph" style:name="P619">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049">
      <style:text-properties fo:color="#1f1f1f" fo:font-family="Arial" style:font-family-asian="Arial" style:font-family-complex="Arial" fo:font-size="14pt" fo:font-weight="bold"/>
    </style:style>
    <style:style style:family="paragraph" style:name="P620">
      <style:paragraph-properties fo:line-height="115%" fo:margin-left="0cm" fo:margin-right="0cm" fo:text-indent="0cm" fo:margin-top="0pt" fo:margin-bottom="0pt" fo:border="none"/>
      <style:text-properties/>
    </style:style>
    <style:style style:family="text" style:name="T1050">
      <style:text-properties fo:color="#1f1f1f" fo:font-family="Arial" style:font-family-asian="Arial" style:font-family-complex="Arial" fo:font-size="12pt"/>
    </style:style>
    <style:style style:parent-style-name="142" style:family="paragraph" style:name="P62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51">
      <style:text-properties fo:color="#1f1f1f" fo:font-family="Arial" style:font-family-asian="Arial" style:font-family-complex="Arial" fo:font-size="12pt" fo:font-weight="bold"/>
    </style:style>
    <style:style style:family="paragraph" style:name="P622">
      <style:paragraph-properties fo:line-height="115%" fo:margin-left="0cm" fo:margin-right="0cm" fo:text-indent="0cm" fo:margin-top="0pt" fo:margin-bottom="0pt" fo:border="none"/>
      <style:text-properties/>
    </style:style>
    <style:style style:family="text" style:name="T1052">
      <style:text-properties fo:color="#1f1f1f" fo:font-family="Arial" style:font-family-asian="Arial" style:font-family-complex="Arial" fo:font-size="12pt"/>
    </style:style>
    <style:style style:parent-style-name="142" style:family="paragraph" style:name="P62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53">
      <style:text-properties fo:color="#1f1f1f" fo:font-family="Arial" style:font-family-asian="Arial" style:font-family-complex="Arial" fo:font-size="12pt" fo:font-weight="bold"/>
    </style:style>
    <style:style style:family="paragraph" style:name="P624">
      <style:paragraph-properties fo:line-height="115%" fo:margin-left="0cm" fo:margin-right="0cm" fo:text-indent="0cm" fo:margin-top="0pt" fo:margin-bottom="0pt" fo:border="none"/>
      <style:text-properties/>
    </style:style>
    <style:style style:family="text" style:name="T1054">
      <style:text-properties fo:color="#1f1f1f" fo:font-family="Arial" style:font-family-asian="Arial" style:font-family-complex="Arial" fo:font-size="12pt"/>
    </style:style>
    <style:style style:parent-style-name="142" style:family="paragraph" style:name="P62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55">
      <style:text-properties fo:color="#1f1f1f" fo:font-family="Arial" style:font-family-asian="Arial" style:font-family-complex="Arial" fo:font-size="12pt" fo:font-weight="bold"/>
    </style:style>
    <style:style style:family="paragraph" style:name="P626">
      <style:paragraph-properties fo:line-height="115%" fo:margin-left="0cm" fo:margin-right="0cm" fo:text-indent="0cm" fo:margin-top="0pt" fo:margin-bottom="0pt" fo:border="none"/>
      <style:text-properties/>
    </style:style>
    <style:style style:family="text" style:name="T1056">
      <style:text-properties fo:color="#1f1f1f" fo:font-family="Arial" style:font-family-asian="Arial" style:font-family-complex="Arial" fo:font-size="12pt"/>
    </style:style>
    <style:style style:parent-style-name="142" style:family="paragraph" style:name="P62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57">
      <style:text-properties fo:color="#1f1f1f" fo:font-family="Arial" style:font-family-asian="Arial" style:font-family-complex="Arial" fo:font-size="12pt" fo:font-weight="bold"/>
    </style:style>
    <style:style style:family="paragraph" style:name="P628">
      <style:paragraph-properties fo:line-height="115%" fo:margin-left="0cm" fo:margin-right="0cm" fo:text-indent="0cm" fo:margin-top="0pt" fo:margin-bottom="0pt" fo:border="none"/>
      <style:text-properties/>
    </style:style>
    <style:style style:family="text" style:name="T1058">
      <style:text-properties fo:color="#1f1f1f" fo:font-family="Arial" style:font-family-asian="Arial" style:font-family-complex="Arial" fo:font-size="12pt"/>
    </style:style>
    <style:style style:parent-style-name="141" style:family="paragraph" style:name="P62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59">
      <style:text-properties fo:color="#1f1f1f" fo:font-family="Arial" style:font-family-asian="Arial" style:font-family-complex="Arial" fo:font-size="14pt" fo:font-weight="bold"/>
    </style:style>
    <style:style style:parent-style-name="668" style:list-style-name="WWNum32" style:family="paragraph" style:name="P630">
      <style:paragraph-properties fo:line-height="115%" fo:margin-right="0cm" fo:margin-top="0pt" fo:margin-bottom="0pt" fo:border="none"/>
      <style:text-properties/>
    </style:style>
    <style:style style:family="text" style:name="T1060">
      <style:text-properties fo:color="#1f1f1f" fo:font-family="Arial" style:font-family-asian="Arial" style:font-family-complex="Arial" fo:font-size="12pt"/>
    </style:style>
    <style:style style:parent-style-name="668" style:list-style-name="WWNum32" style:family="paragraph" style:name="P631">
      <style:paragraph-properties fo:line-height="115%" fo:margin-right="0cm" fo:margin-top="0pt" fo:margin-bottom="0pt" fo:border="none"/>
      <style:text-properties/>
    </style:style>
    <style:style style:family="text" style:name="T1061">
      <style:text-properties fo:color="#1f1f1f" fo:font-family="Arial" style:font-family-asian="Arial" style:font-family-complex="Arial" fo:font-size="12pt"/>
    </style:style>
    <style:style style:parent-style-name="668" style:list-style-name="WWNum32" style:family="paragraph" style:name="P632">
      <style:paragraph-properties fo:line-height="115%" fo:margin-right="0cm" fo:margin-top="0pt" fo:margin-bottom="0pt" fo:border="none"/>
      <style:text-properties/>
    </style:style>
    <style:style style:family="text" style:name="T1062">
      <style:text-properties fo:color="#1f1f1f" fo:font-family="Arial" style:font-family-asian="Arial" style:font-family-complex="Arial" fo:font-size="12pt"/>
    </style:style>
    <style:style style:parent-style-name="668" style:list-style-name="WWNum32" style:family="paragraph" style:name="P633">
      <style:paragraph-properties fo:line-height="115%" fo:margin-right="0cm" fo:margin-top="0pt" fo:margin-bottom="0pt" fo:border="none"/>
      <style:text-properties/>
    </style:style>
    <style:style style:family="text" style:name="T1063">
      <style:text-properties fo:color="#1f1f1f" fo:font-family="Arial" style:font-family-asian="Arial" style:font-family-complex="Arial" fo:font-size="12pt"/>
    </style:style>
    <style:style style:family="paragraph" style:name="P634">
      <style:paragraph-properties/>
      <style:text-properties fo:font-family="Arial" style:font-family-asian="Arial" style:font-family-complex="Arial" fo:font-size="12pt" style:font-size-complex="12pt"/>
    </style:style>
    <style:style style:family="text" style:name="T1064">
      <style:text-properties/>
    </style:style>
    <style:style style:family="text" style:name="T1065">
      <style:text-properties/>
    </style:style>
    <style:style style:family="text" style:name="T1066">
      <style:text-properties/>
    </style:style>
    <style:style style:parent-style-name="141" style:family="paragraph" style:name="P635">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067">
      <style:text-properties fo:color="#1f1f1f" fo:font-family="Arial" style:font-family-asian="Arial" style:font-family-complex="Arial" fo:font-size="14pt" fo:font-weight="bold"/>
    </style:style>
    <style:style style:family="paragraph" style:name="P636">
      <style:paragraph-properties fo:line-height="115%" fo:margin-left="0cm" fo:margin-right="0cm" fo:text-indent="0cm" fo:margin-top="0pt" fo:margin-bottom="0pt" fo:border="none"/>
      <style:text-properties/>
    </style:style>
    <style:style style:family="text" style:name="T1068">
      <style:text-properties fo:color="#1f1f1f" fo:font-family="Arial" style:font-family-asian="Arial" style:font-family-complex="Arial" fo:font-size="12pt"/>
    </style:style>
    <style:style style:parent-style-name="142" style:family="paragraph" style:name="P63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69">
      <style:text-properties fo:color="#1f1f1f" fo:font-family="Arial" style:font-family-asian="Arial" style:font-family-complex="Arial" fo:font-size="12pt" fo:font-weight="bold"/>
    </style:style>
    <style:style style:family="paragraph" style:name="P638">
      <style:paragraph-properties fo:line-height="115%" fo:margin-left="0cm" fo:margin-right="0cm" fo:text-indent="0cm" fo:margin-top="0pt" fo:margin-bottom="0pt" fo:border="none"/>
      <style:text-properties/>
    </style:style>
    <style:style style:family="text" style:name="T1070">
      <style:text-properties fo:color="#1f1f1f" fo:font-family="Arial" style:font-family-asian="Arial" style:font-family-complex="Arial" fo:font-size="12pt"/>
    </style:style>
    <style:style style:parent-style-name="142" style:family="paragraph" style:name="P63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71">
      <style:text-properties fo:color="#1f1f1f" fo:font-family="Arial" style:font-family-asian="Arial" style:font-family-complex="Arial" fo:font-size="12pt" fo:font-weight="bold"/>
    </style:style>
    <style:style style:family="paragraph" style:name="P640">
      <style:paragraph-properties fo:line-height="115%" fo:margin-left="0cm" fo:margin-right="0cm" fo:text-indent="0cm" fo:margin-top="0pt" fo:margin-bottom="0pt" fo:border="none"/>
      <style:text-properties/>
    </style:style>
    <style:style style:family="text" style:name="T1072">
      <style:text-properties fo:color="#1f1f1f" fo:font-family="Arial" style:font-family-asian="Arial" style:font-family-complex="Arial" fo:font-size="12pt"/>
    </style:style>
    <style:style style:parent-style-name="142" style:family="paragraph" style:name="P64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73">
      <style:text-properties fo:color="#1f1f1f" fo:font-family="Arial" style:font-family-asian="Arial" style:font-family-complex="Arial" fo:font-size="12pt" fo:font-weight="bold"/>
    </style:style>
    <style:style style:family="paragraph" style:name="P642">
      <style:paragraph-properties fo:line-height="115%" fo:margin-left="0cm" fo:margin-right="0cm" fo:text-indent="0cm" fo:margin-top="0pt" fo:margin-bottom="0pt" fo:border="none"/>
      <style:text-properties/>
    </style:style>
    <style:style style:family="text" style:name="T1074">
      <style:text-properties fo:color="#1f1f1f" fo:font-family="Arial" style:font-family-asian="Arial" style:font-family-complex="Arial" fo:font-size="12pt"/>
    </style:style>
    <style:style style:parent-style-name="142" style:family="paragraph" style:name="P64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75">
      <style:text-properties fo:color="#1f1f1f" fo:font-family="Arial" style:font-family-asian="Arial" style:font-family-complex="Arial" fo:font-size="12pt" fo:font-weight="bold"/>
    </style:style>
    <style:style style:family="paragraph" style:name="P644">
      <style:paragraph-properties fo:line-height="115%" fo:margin-left="0cm" fo:margin-right="0cm" fo:text-indent="0cm" fo:margin-top="0pt" fo:margin-bottom="0pt" fo:border="none"/>
      <style:text-properties/>
    </style:style>
    <style:style style:family="text" style:name="T1076">
      <style:text-properties fo:color="#1f1f1f" fo:font-family="Arial" style:font-family-asian="Arial" style:font-family-complex="Arial" fo:font-size="12pt"/>
    </style:style>
    <style:style style:family="text" style:name="T1077">
      <style:text-properties fo:color="#1f1f1f" fo:font-family="Arial" style:font-family-asian="Arial" style:font-family-complex="Arial" fo:font-size="12pt"/>
    </style:style>
    <style:style style:parent-style-name="141" style:family="paragraph" style:name="P64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78">
      <style:text-properties fo:color="#1f1f1f" fo:font-family="Arial" style:font-family-asian="Arial" style:font-family-complex="Arial" fo:font-size="14pt" fo:font-weight="bold"/>
    </style:style>
    <style:style style:parent-style-name="668" style:list-style-name="WWNum33" style:family="paragraph" style:name="P646">
      <style:paragraph-properties fo:line-height="115%" fo:margin-right="0cm" fo:margin-top="0pt" fo:margin-bottom="0pt" fo:border="none"/>
      <style:text-properties/>
    </style:style>
    <style:style style:family="text" style:name="T1079">
      <style:text-properties fo:color="#1f1f1f" fo:font-family="Arial" style:font-family-asian="Arial" style:font-family-complex="Arial" fo:font-size="12pt"/>
    </style:style>
    <style:style style:parent-style-name="668" style:list-style-name="WWNum33" style:family="paragraph" style:name="P647">
      <style:paragraph-properties fo:line-height="115%" fo:margin-right="0cm" fo:margin-top="0pt" fo:margin-bottom="0pt" fo:border="none"/>
      <style:text-properties/>
    </style:style>
    <style:style style:family="text" style:name="T1080">
      <style:text-properties fo:color="#1f1f1f" fo:font-family="Arial" style:font-family-asian="Arial" style:font-family-complex="Arial" fo:font-size="12pt"/>
    </style:style>
    <style:style style:parent-style-name="668" style:list-style-name="WWNum33" style:family="paragraph" style:name="P648">
      <style:paragraph-properties fo:line-height="115%" fo:margin-right="0cm" fo:margin-top="0pt" fo:margin-bottom="0pt" fo:border="none"/>
      <style:text-properties/>
    </style:style>
    <style:style style:family="text" style:name="T1081">
      <style:text-properties fo:color="#1f1f1f" fo:font-family="Arial" style:font-family-asian="Arial" style:font-family-complex="Arial" fo:font-size="12pt"/>
    </style:style>
    <style:style style:parent-style-name="668" style:list-style-name="WWNum33" style:family="paragraph" style:name="P649">
      <style:paragraph-properties fo:line-height="115%" fo:margin-right="0cm" fo:margin-top="0pt" fo:margin-bottom="0pt" fo:border="none"/>
      <style:text-properties/>
    </style:style>
    <style:style style:family="text" style:name="T1082">
      <style:text-properties fo:color="#1f1f1f" fo:font-family="Arial" style:font-family-asian="Arial" style:font-family-complex="Arial" fo:font-size="12pt"/>
    </style:style>
    <style:style style:family="paragraph" style:name="P650">
      <style:paragraph-properties/>
      <style:text-properties fo:font-family="Arial" style:font-family-asian="Arial" style:font-family-complex="Arial" fo:font-size="12pt" style:font-size-complex="12pt"/>
    </style:style>
    <style:style style:family="text" style:name="T1083">
      <style:text-properties/>
    </style:style>
    <style:style style:family="text" style:name="T1084">
      <style:text-properties/>
    </style:style>
    <style:style style:family="text" style:name="T1085">
      <style:text-properties/>
    </style:style>
    <style:style style:family="paragraph" style:name="P651">
      <style:paragraph-properties fo:line-height="115%" fo:margin-left="0cm" fo:margin-right="0cm" fo:text-indent="0cm" fo:margin-top="0pt" fo:margin-bottom="0pt" fo:break-before="page" fo:border="none"/>
      <style:text-properties/>
    </style:style>
    <style:style style:family="text" style:name="T1086">
      <style:text-properties fo:color="#1f1f1f" fo:font-family="Arial" style:font-family-asian="Arial" style:font-family-complex="Arial" fo:font-size="12pt"/>
    </style:style>
    <style:style style:parent-style-name="141" style:family="paragraph" style:name="P65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87">
      <style:text-properties fo:color="#1f1f1f" fo:font-family="Arial" style:font-family-asian="Arial" style:font-family-complex="Arial" fo:font-size="14pt" fo:font-weight="bold"/>
    </style:style>
    <style:style style:family="paragraph" style:name="P653">
      <style:paragraph-properties fo:line-height="115%" fo:margin-left="0cm" fo:margin-right="0cm" fo:text-indent="0cm" fo:margin-top="0pt" fo:margin-bottom="0pt" fo:border="none"/>
      <style:text-properties/>
    </style:style>
    <style:style style:family="text" style:name="T1088">
      <style:text-properties fo:color="#1f1f1f" fo:font-family="Arial" style:font-family-asian="Arial" style:font-family-complex="Arial" fo:font-size="12pt"/>
    </style:style>
    <style:style style:parent-style-name="142" style:family="paragraph" style:name="P6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89">
      <style:text-properties fo:color="#1f1f1f" fo:font-family="Arial" style:font-family-asian="Arial" style:font-family-complex="Arial" fo:font-size="12pt" fo:font-weight="bold"/>
    </style:style>
    <style:style style:family="paragraph" style:name="P655">
      <style:paragraph-properties fo:line-height="115%" fo:margin-left="0cm" fo:margin-right="0cm" fo:text-indent="0cm" fo:margin-top="0pt" fo:margin-bottom="0pt" fo:border="none"/>
      <style:text-properties/>
    </style:style>
    <style:style style:family="text" style:name="T1090">
      <style:text-properties fo:color="#1f1f1f" fo:font-family="Arial" style:font-family-asian="Arial" style:font-family-complex="Arial" fo:font-size="12pt"/>
    </style:style>
    <style:style style:family="text" style:name="T1091">
      <style:text-properties fo:color="#1f1f1f" fo:font-family="Arial" style:font-family-asian="Arial" style:font-family-complex="Arial" fo:font-size="12pt"/>
    </style:style>
    <style:style style:parent-style-name="142" style:family="paragraph" style:name="P65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92">
      <style:text-properties fo:color="#1f1f1f" fo:font-family="Arial" style:font-family-asian="Arial" style:font-family-complex="Arial" fo:font-size="12pt" fo:font-weight="bold"/>
    </style:style>
    <style:style style:family="paragraph" style:name="P657">
      <style:paragraph-properties fo:line-height="115%" fo:margin-left="0cm" fo:margin-right="0cm" fo:text-indent="0cm" fo:margin-top="0pt" fo:margin-bottom="0pt" fo:border="none"/>
      <style:text-properties/>
    </style:style>
    <style:style style:family="text" style:name="T1093">
      <style:text-properties fo:color="#1f1f1f" fo:font-family="Arial" style:font-family-asian="Arial" style:font-family-complex="Arial" fo:font-size="12pt"/>
    </style:style>
    <style:style style:family="text" style:name="T1094">
      <style:text-properties fo:color="#1f1f1f" fo:font-family="Arial" style:font-family-asian="Arial" style:font-family-complex="Arial" fo:font-size="12pt"/>
    </style:style>
    <style:style style:parent-style-name="142" style:family="paragraph" style:name="P65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95">
      <style:text-properties fo:color="#1f1f1f" fo:font-family="Arial" style:font-family-asian="Arial" style:font-family-complex="Arial" fo:font-size="12pt" fo:font-weight="bold"/>
    </style:style>
    <style:style style:family="paragraph" style:name="P659">
      <style:paragraph-properties fo:line-height="115%" fo:margin-left="0cm" fo:margin-right="0cm" fo:text-indent="0cm" fo:margin-top="0pt" fo:margin-bottom="0pt" fo:border="none"/>
      <style:text-properties/>
    </style:style>
    <style:style style:family="text" style:name="T1096">
      <style:text-properties fo:color="#1f1f1f" fo:font-family="Arial" style:font-family-asian="Arial" style:font-family-complex="Arial" fo:font-size="12pt"/>
    </style:style>
    <style:style style:parent-style-name="142" style:family="paragraph" style:name="P66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97">
      <style:text-properties fo:color="#1f1f1f" fo:font-family="Arial" style:font-family-asian="Arial" style:font-family-complex="Arial" fo:font-size="12pt" fo:font-weight="bold"/>
    </style:style>
    <style:style style:family="paragraph" style:name="P661">
      <style:paragraph-properties fo:line-height="115%" fo:margin-left="0cm" fo:margin-right="0cm" fo:text-indent="0cm" fo:margin-top="0pt" fo:margin-bottom="0pt" fo:border="none"/>
      <style:text-properties/>
    </style:style>
    <style:style style:family="text" style:name="T1098">
      <style:text-properties fo:color="#1f1f1f" fo:font-family="Arial" style:font-family-asian="Arial" style:font-family-complex="Arial" fo:font-size="12pt"/>
    </style:style>
    <style:style style:family="text" style:name="T1099">
      <style:text-properties fo:color="#1f1f1f" fo:font-family="Arial" style:font-family-asian="Arial" style:font-family-complex="Arial" fo:font-size="12pt"/>
    </style:style>
    <style:style style:parent-style-name="141" style:family="paragraph" style:name="P66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00">
      <style:text-properties fo:color="#1f1f1f" fo:font-family="Arial" style:font-family-asian="Arial" style:font-family-complex="Arial" fo:font-size="14pt" fo:font-weight="bold"/>
    </style:style>
    <style:style style:parent-style-name="668" style:list-style-name="WWNum34" style:family="paragraph" style:name="P663">
      <style:paragraph-properties fo:line-height="115%" fo:margin-right="0cm" fo:margin-top="0pt" fo:margin-bottom="0pt" fo:border="none"/>
      <style:text-properties/>
    </style:style>
    <style:style style:family="text" style:name="T1101">
      <style:text-properties fo:color="#1f1f1f" fo:font-family="Arial" style:font-family-asian="Arial" style:font-family-complex="Arial" fo:font-size="12pt"/>
    </style:style>
    <style:style style:parent-style-name="668" style:list-style-name="WWNum34" style:family="paragraph" style:name="P664">
      <style:paragraph-properties fo:line-height="115%" fo:margin-right="0cm" fo:margin-top="0pt" fo:margin-bottom="0pt" fo:border="none"/>
      <style:text-properties/>
    </style:style>
    <style:style style:family="text" style:name="T1102">
      <style:text-properties fo:color="#1f1f1f" fo:font-family="Arial" style:font-family-asian="Arial" style:font-family-complex="Arial" fo:font-size="12pt"/>
    </style:style>
    <style:style style:parent-style-name="668" style:list-style-name="WWNum34" style:family="paragraph" style:name="P665">
      <style:paragraph-properties fo:line-height="115%" fo:margin-right="0cm" fo:margin-top="0pt" fo:margin-bottom="0pt" fo:border="none"/>
      <style:text-properties/>
    </style:style>
    <style:style style:family="text" style:name="T1103">
      <style:text-properties fo:color="#1f1f1f" fo:font-family="Arial" style:font-family-asian="Arial" style:font-family-complex="Arial" fo:font-size="12pt"/>
    </style:style>
    <style:style style:parent-style-name="668" style:list-style-name="WWNum34" style:family="paragraph" style:name="P666">
      <style:paragraph-properties fo:line-height="115%" fo:margin-right="0cm" fo:margin-top="0pt" fo:margin-bottom="0pt" fo:border="none"/>
      <style:text-properties/>
    </style:style>
    <style:style style:family="text" style:name="T1104">
      <style:text-properties fo:color="#1f1f1f" fo:font-family="Arial" style:font-family-asian="Arial" style:font-family-complex="Arial" fo:font-size="12pt"/>
    </style:style>
    <style:style style:family="paragraph" style:name="P667">
      <style:paragraph-properties/>
      <style:text-properties fo:font-family="Arial" style:font-family-asian="Arial" style:font-family-complex="Arial" fo:font-size="12pt" style:font-size-complex="12pt"/>
    </style:style>
    <style:style style:family="text" style:name="T1105">
      <style:text-properties/>
    </style:style>
    <style:style style:family="text" style:name="T1106">
      <style:text-properties/>
    </style:style>
    <style:style style:family="text" style:name="T1107">
      <style:text-properties/>
    </style:style>
    <style:style style:parent-style-name="141" style:family="paragraph" style:name="P668">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108">
      <style:text-properties fo:color="#1f1f1f" fo:font-family="Arial" style:font-family-asian="Arial" style:font-family-complex="Arial" fo:font-size="14pt" fo:font-weight="bold"/>
    </style:style>
    <style:style style:family="paragraph" style:name="P669">
      <style:paragraph-properties fo:line-height="115%" fo:margin-left="0cm" fo:margin-right="0cm" fo:text-indent="0cm" fo:margin-top="0pt" fo:margin-bottom="0pt" fo:border="none"/>
      <style:text-properties/>
    </style:style>
    <style:style style:family="text" style:name="T1109">
      <style:text-properties fo:color="#1f1f1f" fo:font-family="Arial" style:font-family-asian="Arial" style:font-family-complex="Arial" fo:font-size="12pt"/>
    </style:style>
    <style:style style:parent-style-name="142" style:family="paragraph" style:name="P67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10">
      <style:text-properties fo:color="#1f1f1f" fo:font-family="Arial" style:font-family-asian="Arial" style:font-family-complex="Arial" fo:font-size="12pt" fo:font-weight="bold"/>
    </style:style>
    <style:style style:family="paragraph" style:name="P671">
      <style:paragraph-properties fo:line-height="115%" fo:margin-left="0cm" fo:margin-right="0cm" fo:text-indent="0cm" fo:margin-top="0pt" fo:margin-bottom="0pt" fo:border="none"/>
      <style:text-properties/>
    </style:style>
    <style:style style:family="text" style:name="T1111">
      <style:text-properties fo:color="#1f1f1f" fo:font-family="Arial" style:font-family-asian="Arial" style:font-family-complex="Arial" fo:font-size="12pt"/>
    </style:style>
    <style:style style:family="text" style:name="T1112">
      <style:text-properties fo:color="#1f1f1f" fo:font-family="Arial" style:font-family-asian="Arial" style:font-family-complex="Arial" fo:font-size="12pt"/>
    </style:style>
    <style:style style:parent-style-name="142" style:family="paragraph" style:name="P67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13">
      <style:text-properties fo:color="#1f1f1f" fo:font-family="Arial" style:font-family-asian="Arial" style:font-family-complex="Arial" fo:font-size="12pt" fo:font-weight="bold"/>
    </style:style>
    <style:style style:family="paragraph" style:name="P673">
      <style:paragraph-properties fo:line-height="115%" fo:margin-left="0cm" fo:margin-right="0cm" fo:text-indent="0cm" fo:margin-top="0pt" fo:margin-bottom="0pt" fo:border="none"/>
      <style:text-properties/>
    </style:style>
    <style:style style:family="text" style:name="T1114">
      <style:text-properties fo:color="#1f1f1f" fo:font-family="Arial" style:font-family-asian="Arial" style:font-family-complex="Arial" fo:font-size="12pt"/>
    </style:style>
    <style:style style:family="text" style:name="T1115">
      <style:text-properties fo:color="#1f1f1f" fo:font-family="Arial" style:font-family-asian="Arial" style:font-family-complex="Arial" fo:font-size="12pt"/>
    </style:style>
    <style:style style:parent-style-name="142" style:family="paragraph" style:name="P67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16">
      <style:text-properties fo:color="#1f1f1f" fo:font-family="Arial" style:font-family-asian="Arial" style:font-family-complex="Arial" fo:font-size="12pt" fo:font-weight="bold"/>
    </style:style>
    <style:style style:family="paragraph" style:name="P675">
      <style:paragraph-properties fo:line-height="115%" fo:margin-left="0cm" fo:margin-right="0cm" fo:text-indent="0cm" fo:margin-top="0pt" fo:margin-bottom="0pt" fo:border="none"/>
      <style:text-properties/>
    </style:style>
    <style:style style:family="text" style:name="T1117">
      <style:text-properties fo:color="#1f1f1f" fo:font-family="Arial" style:font-family-asian="Arial" style:font-family-complex="Arial" fo:font-size="12pt"/>
    </style:style>
    <style:style style:family="text" style:name="T1118">
      <style:text-properties fo:color="#1f1f1f" fo:font-family="Arial" style:font-family-asian="Arial" style:font-family-complex="Arial" fo:font-size="12pt"/>
    </style:style>
    <style:style style:parent-style-name="142" style:family="paragraph" style:name="P67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19">
      <style:text-properties fo:color="#1f1f1f" fo:font-family="Arial" style:font-family-asian="Arial" style:font-family-complex="Arial" fo:font-size="12pt" fo:font-weight="bold"/>
    </style:style>
    <style:style style:family="paragraph" style:name="P677">
      <style:paragraph-properties fo:line-height="115%" fo:margin-left="0cm" fo:margin-right="0cm" fo:text-indent="0cm" fo:margin-top="0pt" fo:margin-bottom="0pt" fo:border="none"/>
      <style:text-properties/>
    </style:style>
    <style:style style:family="text" style:name="T1120">
      <style:text-properties fo:color="#1f1f1f" fo:font-family="Arial" style:font-family-asian="Arial" style:font-family-complex="Arial" fo:font-size="12pt"/>
    </style:style>
    <style:style style:parent-style-name="141" style:family="paragraph" style:name="P67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21">
      <style:text-properties fo:color="#1f1f1f" fo:font-family="Arial" style:font-family-asian="Arial" style:font-family-complex="Arial" fo:font-size="14pt" fo:font-weight="bold"/>
    </style:style>
    <style:style style:parent-style-name="668" style:list-style-name="WWNum35" style:family="paragraph" style:name="P679">
      <style:paragraph-properties fo:line-height="115%" fo:margin-right="0cm" fo:margin-top="0pt" fo:margin-bottom="0pt" fo:border="none"/>
      <style:text-properties/>
    </style:style>
    <style:style style:family="text" style:name="T1122">
      <style:text-properties fo:color="#1f1f1f" fo:font-family="Arial" style:font-family-asian="Arial" style:font-family-complex="Arial" fo:font-size="12pt"/>
    </style:style>
    <style:style style:parent-style-name="668" style:list-style-name="WWNum35" style:family="paragraph" style:name="P680">
      <style:paragraph-properties fo:line-height="115%" fo:margin-right="0cm" fo:margin-top="0pt" fo:margin-bottom="0pt" fo:border="none"/>
      <style:text-properties/>
    </style:style>
    <style:style style:family="text" style:name="T1123">
      <style:text-properties fo:color="#1f1f1f" fo:font-family="Arial" style:font-family-asian="Arial" style:font-family-complex="Arial" fo:font-size="12pt"/>
    </style:style>
    <style:style style:parent-style-name="668" style:list-style-name="WWNum35" style:family="paragraph" style:name="P681">
      <style:paragraph-properties fo:line-height="115%" fo:margin-right="0cm" fo:margin-top="0pt" fo:margin-bottom="0pt" fo:border="none"/>
      <style:text-properties/>
    </style:style>
    <style:style style:family="text" style:name="T1124">
      <style:text-properties fo:color="#1f1f1f" fo:font-family="Arial" style:font-family-asian="Arial" style:font-family-complex="Arial" fo:font-size="12pt"/>
    </style:style>
    <style:style style:parent-style-name="668" style:list-style-name="WWNum35" style:family="paragraph" style:name="P682">
      <style:paragraph-properties fo:line-height="115%" fo:margin-right="0cm" fo:margin-top="0pt" fo:margin-bottom="0pt" fo:border="none"/>
      <style:text-properties/>
    </style:style>
    <style:style style:family="text" style:name="T1125">
      <style:text-properties fo:color="#1f1f1f" fo:font-family="Arial" style:font-family-asian="Arial" style:font-family-complex="Arial" fo:font-size="12pt"/>
    </style:style>
    <style:style style:family="paragraph" style:name="P683">
      <style:paragraph-properties/>
      <style:text-properties fo:font-family="Arial" style:font-family-asian="Arial" style:font-family-complex="Arial" fo:font-size="12pt" style:font-size-complex="12pt"/>
    </style:style>
    <style:style style:family="text" style:name="T1126">
      <style:text-properties/>
    </style:style>
    <style:style style:family="text" style:name="T1127">
      <style:text-properties/>
    </style:style>
    <style:style style:family="text" style:name="T1128">
      <style:text-properties/>
    </style:style>
    <style:style style:parent-style-name="141" style:family="paragraph" style:name="P684">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129">
      <style:text-properties fo:color="#1f1f1f" fo:font-family="Arial" style:font-family-asian="Arial" style:font-family-complex="Arial" fo:font-size="14pt" fo:font-weight="bold"/>
    </style:style>
    <style:style style:family="paragraph" style:name="P685">
      <style:paragraph-properties fo:line-height="115%" fo:margin-left="0cm" fo:margin-right="0cm" fo:text-indent="0cm" fo:margin-top="0pt" fo:margin-bottom="0pt" fo:border="none"/>
      <style:text-properties/>
    </style:style>
    <style:style style:family="text" style:name="T1130">
      <style:text-properties fo:color="#1f1f1f" fo:font-family="Arial" style:font-family-asian="Arial" style:font-family-complex="Arial" fo:font-size="12pt"/>
    </style:style>
    <style:style style:parent-style-name="142" style:family="paragraph" style:name="P68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31">
      <style:text-properties fo:color="#1f1f1f" fo:font-family="Arial" style:font-family-asian="Arial" style:font-family-complex="Arial" fo:font-size="12pt" fo:font-weight="bold"/>
    </style:style>
    <style:style style:family="paragraph" style:name="P687">
      <style:paragraph-properties fo:line-height="115%" fo:margin-left="0cm" fo:margin-right="0cm" fo:text-indent="0cm" fo:margin-top="0pt" fo:margin-bottom="0pt" fo:border="none"/>
      <style:text-properties/>
    </style:style>
    <style:style style:family="text" style:name="T1132">
      <style:text-properties fo:color="#1f1f1f" fo:font-family="Arial" style:font-family-asian="Arial" style:font-family-complex="Arial" fo:font-size="12pt"/>
    </style:style>
    <style:style style:family="text" style:name="T1133">
      <style:text-properties fo:color="#1f1f1f" fo:font-family="Arial" style:font-family-asian="Arial" style:font-family-complex="Arial" fo:font-size="12pt"/>
    </style:style>
    <style:style style:parent-style-name="142" style:family="paragraph" style:name="P68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34">
      <style:text-properties fo:color="#1f1f1f" fo:font-family="Arial" style:font-family-asian="Arial" style:font-family-complex="Arial" fo:font-size="12pt" fo:font-weight="bold"/>
    </style:style>
    <style:style style:family="paragraph" style:name="P689">
      <style:paragraph-properties fo:line-height="115%" fo:margin-left="0cm" fo:margin-right="0cm" fo:text-indent="0cm" fo:margin-top="0pt" fo:margin-bottom="0pt" fo:border="none"/>
      <style:text-properties/>
    </style:style>
    <style:style style:family="text" style:name="T1135">
      <style:text-properties fo:color="#1f1f1f" fo:font-family="Arial" style:font-family-asian="Arial" style:font-family-complex="Arial" fo:font-size="12pt"/>
    </style:style>
    <style:style style:family="paragraph" style:name="P690">
      <style:paragraph-properties fo:line-height="115%" fo:margin-left="0cm" fo:margin-right="0cm" fo:text-indent="0cm" fo:margin-top="0pt" fo:margin-bottom="0pt" fo:border="none"/>
      <style:text-properties/>
    </style:style>
    <style:style style:family="text" style:name="T1136">
      <style:text-properties fo:color="#1f1f1f" fo:font-family="Arial" style:font-family-asian="Arial" style:font-family-complex="Arial" fo:font-size="12pt"/>
    </style:style>
    <style:style style:family="paragraph" style:name="P691">
      <style:paragraph-properties fo:line-height="115%" fo:margin-left="0cm" fo:margin-right="0cm" fo:text-indent="0cm" fo:margin-top="0pt" fo:margin-bottom="0pt" fo:border="none"/>
      <style:text-properties/>
    </style:style>
    <style:style style:family="text" style:name="T1137">
      <style:text-properties fo:color="#1f1f1f" fo:font-family="Arial" style:font-family-asian="Arial" style:font-family-complex="Arial" fo:font-size="12pt"/>
    </style:style>
    <style:style style:parent-style-name="142" style:family="paragraph" style:name="P69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38">
      <style:text-properties fo:color="#1f1f1f" fo:font-family="Arial" style:font-family-asian="Arial" style:font-family-complex="Arial" fo:font-size="12pt" fo:font-weight="bold"/>
    </style:style>
    <style:style style:family="paragraph" style:name="P693">
      <style:paragraph-properties fo:line-height="115%" fo:margin-left="0cm" fo:margin-right="0cm" fo:text-indent="0cm" fo:margin-top="0pt" fo:margin-bottom="0pt" fo:border="none"/>
      <style:text-properties/>
    </style:style>
    <style:style style:family="text" style:name="T1139">
      <style:text-properties fo:color="#1f1f1f" fo:font-family="Arial" style:font-family-asian="Arial" style:font-family-complex="Arial" fo:font-size="12pt"/>
    </style:style>
    <style:style style:family="table" style:name="ta7">
      <style:paragraph-properties fo:line-height="100%" fo:margin-bottom="0pt"/>
      <style:table-properties style:width="8.973cm" fo:margin-left="0cm" table:align="left" style:use-optimal-column-width="true"/>
    </style:style>
    <style:style style:family="table-column" style:name="co16">
      <style:table-column-properties style:column-width="1.371cm" style:use-optimal-column-width="true"/>
    </style:style>
    <style:style style:family="table-column" style:name="co17">
      <style:table-column-properties style:column-width="3.63cm" style:use-optimal-column-width="true"/>
    </style:style>
    <style:style style:family="table-column" style:name="co18">
      <style:table-column-properties style:column-width="3.973cm" style:use-optimal-column-width="true"/>
    </style:style>
    <style:style style:family="table-row" style:name="ro32">
      <style:table-row-properties/>
    </style:style>
    <style:style style:family="table-cell" style:name="ce8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94">
      <style:paragraph-properties style:line-height-at-least="12pt" fo:margin-top="0pt" fo:margin-bottom="0pt"/>
      <style:text-properties/>
    </style:style>
    <style:style style:family="text" style:name="T1140">
      <style:text-properties fo:color="#1f1f1f" fo:font-family="Arial" style:font-family-asian="Arial" style:font-family-complex="Arial" fo:font-size="12pt" fo:font-weight="bold"/>
    </style:style>
    <style:style style:family="table-cell" style:name="ce8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95">
      <style:paragraph-properties style:line-height-at-least="12pt" fo:margin-top="0pt" fo:margin-bottom="0pt"/>
      <style:text-properties/>
    </style:style>
    <style:style style:family="text" style:name="T1141">
      <style:text-properties fo:color="#1f1f1f" fo:font-family="Arial" style:font-family-asian="Arial" style:font-family-complex="Arial" fo:font-size="12pt" fo:font-weight="bold"/>
    </style:style>
    <style:style style:family="table-cell" style:name="ce8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96">
      <style:paragraph-properties style:line-height-at-least="12pt" fo:margin-top="0pt" fo:margin-bottom="0pt"/>
      <style:text-properties/>
    </style:style>
    <style:style style:family="text" style:name="T1142">
      <style:text-properties fo:color="#1f1f1f" fo:font-family="Arial" style:font-family-asian="Arial" style:font-family-complex="Arial" fo:font-size="12pt" fo:font-weight="bold"/>
    </style:style>
    <style:style style:family="table-row" style:name="ro33">
      <style:table-row-properties/>
    </style:style>
    <style:style style:family="table-cell" style:name="ce8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97">
      <style:paragraph-properties style:line-height-at-least="12pt" fo:margin-top="0pt" fo:margin-bottom="0pt"/>
      <style:text-properties/>
    </style:style>
    <style:style style:family="text" style:name="T1143">
      <style:text-properties fo:color="#1f1f1f" fo:font-family="Arial" style:font-family-asian="Arial" style:font-family-complex="Arial" fo:font-size="12pt"/>
    </style:style>
    <style:style style:family="table-cell" style:name="ce8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98">
      <style:paragraph-properties style:line-height-at-least="12pt" fo:margin-top="0pt" fo:margin-bottom="0pt"/>
      <style:text-properties/>
    </style:style>
    <style:style style:family="text" style:name="T1144">
      <style:text-properties fo:color="#1f1f1f" fo:font-family="Arial" style:font-family-asian="Arial" style:font-family-complex="Arial" fo:font-size="12pt"/>
    </style:style>
    <style:style style:family="table-cell" style:name="ce8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99">
      <style:paragraph-properties style:line-height-at-least="12pt" fo:margin-top="0pt" fo:margin-bottom="0pt"/>
      <style:text-properties/>
    </style:style>
    <style:style style:family="text" style:name="T1145">
      <style:text-properties fo:color="#1f1f1f" fo:font-family="Arial" style:font-family-asian="Arial" style:font-family-complex="Arial" fo:font-size="12pt"/>
    </style:style>
    <style:style style:parent-style-name="142" style:family="paragraph" style:name="P70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46">
      <style:text-properties fo:color="#1f1f1f" fo:font-family="Arial" style:font-family-asian="Arial" style:font-family-complex="Arial" fo:font-size="12pt" fo:font-weight="bold"/>
    </style:style>
    <style:style style:family="paragraph" style:name="P701">
      <style:paragraph-properties fo:line-height="115%" fo:margin-left="0cm" fo:margin-right="0cm" fo:text-indent="0cm" fo:margin-top="0pt" fo:margin-bottom="0pt" fo:border="none"/>
      <style:text-properties/>
    </style:style>
    <style:style style:family="text" style:name="T1147">
      <style:text-properties fo:color="#1f1f1f" fo:font-family="Arial" style:font-family-asian="Arial" style:font-family-complex="Arial" fo:font-size="12pt"/>
    </style:style>
    <style:style style:parent-style-name="141" style:family="paragraph" style:name="P70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48">
      <style:text-properties fo:color="#1f1f1f" fo:font-family="Arial" style:font-family-asian="Arial" style:font-family-complex="Arial" fo:font-size="14pt" fo:font-weight="bold"/>
    </style:style>
    <style:style style:parent-style-name="668" style:list-style-name="WWNum36" style:family="paragraph" style:name="P703">
      <style:paragraph-properties fo:line-height="115%" fo:margin-right="0cm" fo:margin-top="0pt" fo:margin-bottom="0pt" fo:border="none"/>
      <style:text-properties/>
    </style:style>
    <style:style style:family="text" style:name="T1149">
      <style:text-properties fo:color="#1f1f1f" fo:font-family="Arial" style:font-family-asian="Arial" style:font-family-complex="Arial" fo:font-size="12pt"/>
    </style:style>
    <style:style style:parent-style-name="668" style:list-style-name="WWNum36" style:family="paragraph" style:name="P704">
      <style:paragraph-properties fo:line-height="115%" fo:margin-right="0cm" fo:margin-top="0pt" fo:margin-bottom="0pt" fo:border="none"/>
      <style:text-properties/>
    </style:style>
    <style:style style:family="text" style:name="T1150">
      <style:text-properties fo:color="#1f1f1f" fo:font-family="Arial" style:font-family-asian="Arial" style:font-family-complex="Arial" fo:font-size="12pt"/>
    </style:style>
    <style:style style:parent-style-name="668" style:list-style-name="WWNum36" style:family="paragraph" style:name="P705">
      <style:paragraph-properties fo:line-height="115%" fo:margin-right="0cm" fo:margin-top="0pt" fo:margin-bottom="0pt" fo:border="none"/>
      <style:text-properties/>
    </style:style>
    <style:style style:family="text" style:name="T1151">
      <style:text-properties fo:color="#1f1f1f" fo:font-family="Arial" style:font-family-asian="Arial" style:font-family-complex="Arial" fo:font-size="12pt"/>
    </style:style>
    <style:style style:parent-style-name="668" style:list-style-name="WWNum36" style:family="paragraph" style:name="P706">
      <style:paragraph-properties fo:line-height="115%" fo:margin-right="0cm" fo:margin-top="0pt" fo:margin-bottom="0pt" fo:border="none"/>
      <style:text-properties/>
    </style:style>
    <style:style style:family="text" style:name="T1152">
      <style:text-properties fo:color="#1f1f1f" fo:font-family="Arial" style:font-family-asian="Arial" style:font-family-complex="Arial" fo:font-size="12pt"/>
    </style:style>
    <style:style style:family="paragraph" style:name="P707">
      <style:paragraph-properties/>
      <style:text-properties fo:font-family="Arial" style:font-family-asian="Arial" style:font-family-complex="Arial" fo:font-size="12pt" style:font-size-complex="12pt"/>
    </style:style>
    <style:style style:family="text" style:name="T1153">
      <style:text-properties/>
    </style:style>
    <style:style style:family="text" style:name="T1154">
      <style:text-properties/>
    </style:style>
    <style:style style:family="text" style:name="T1155">
      <style:text-properties/>
    </style:style>
    <style:style style:family="paragraph" style:name="P708">
      <style:paragraph-properties fo:line-height="115%" fo:margin-left="0cm" fo:margin-right="0cm" fo:text-indent="0cm" fo:margin-top="0pt" fo:margin-bottom="0pt" fo:break-before="page" fo:border="none"/>
      <style:text-properties/>
    </style:style>
    <style:style style:family="text" style:name="T1156">
      <style:text-properties fo:color="#1f1f1f" fo:font-family="Arial" style:font-family-asian="Arial" style:font-family-complex="Arial" fo:font-size="12pt"/>
    </style:style>
    <style:style style:parent-style-name="141" style:family="paragraph" style:name="P70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57">
      <style:text-properties fo:color="#1f1f1f" fo:font-family="Arial" style:font-family-asian="Arial" style:font-family-complex="Arial" fo:font-size="14pt" fo:font-weight="bold"/>
    </style:style>
    <style:style style:family="paragraph" style:name="P710">
      <style:paragraph-properties fo:line-height="115%" fo:margin-left="0cm" fo:margin-right="0cm" fo:text-indent="0cm" fo:margin-top="0pt" fo:margin-bottom="0pt" fo:border="none"/>
      <style:text-properties/>
    </style:style>
    <style:style style:family="text" style:name="T1158">
      <style:text-properties fo:color="#1f1f1f" fo:font-family="Arial" style:font-family-asian="Arial" style:font-family-complex="Arial" fo:font-size="12pt"/>
    </style:style>
    <style:style style:parent-style-name="142" style:family="paragraph" style:name="P71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59">
      <style:text-properties fo:color="#1f1f1f" fo:font-family="Arial" style:font-family-asian="Arial" style:font-family-complex="Arial" fo:font-size="12pt" fo:font-weight="bold"/>
    </style:style>
    <style:style style:family="paragraph" style:name="P712">
      <style:paragraph-properties fo:line-height="115%" fo:margin-left="0cm" fo:margin-right="0cm" fo:text-indent="0cm" fo:margin-top="0pt" fo:margin-bottom="0pt" fo:border="none"/>
      <style:text-properties/>
    </style:style>
    <style:style style:family="text" style:name="T1160">
      <style:text-properties fo:color="#1f1f1f" fo:font-family="Arial" style:font-family-asian="Arial" style:font-family-complex="Arial" fo:font-size="12pt"/>
    </style:style>
    <style:style style:parent-style-name="142" style:family="paragraph" style:name="P71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61">
      <style:text-properties fo:color="#1f1f1f" fo:font-family="Arial" style:font-family-asian="Arial" style:font-family-complex="Arial" fo:font-size="12pt" fo:font-weight="bold"/>
    </style:style>
    <style:style style:family="paragraph" style:name="P714">
      <style:paragraph-properties fo:line-height="115%" fo:margin-left="0cm" fo:margin-right="0cm" fo:text-indent="0cm" fo:margin-top="0pt" fo:margin-bottom="0pt" fo:border="none"/>
      <style:text-properties/>
    </style:style>
    <style:style style:family="text" style:name="T1162">
      <style:text-properties fo:color="#1f1f1f" fo:font-family="Arial" style:font-family-asian="Arial" style:font-family-complex="Arial" fo:font-size="12pt"/>
    </style:style>
    <style:style style:parent-style-name="142" style:family="paragraph" style:name="P71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63">
      <style:text-properties fo:color="#1f1f1f" fo:font-family="Arial" style:font-family-asian="Arial" style:font-family-complex="Arial" fo:font-size="12pt" fo:font-weight="bold"/>
    </style:style>
    <style:style style:family="paragraph" style:name="P716">
      <style:paragraph-properties fo:line-height="115%" fo:margin-left="0cm" fo:margin-right="0cm" fo:text-indent="0cm" fo:margin-top="0pt" fo:margin-bottom="0pt" fo:border="none"/>
      <style:text-properties/>
    </style:style>
    <style:style style:family="text" style:name="T1164">
      <style:text-properties fo:color="#1f1f1f" fo:font-family="Arial" style:font-family-asian="Arial" style:font-family-complex="Arial" fo:font-size="12pt"/>
    </style:style>
    <style:style style:parent-style-name="668" style:list-style-name="WWNum37" style:family="paragraph" style:name="P717">
      <style:paragraph-properties fo:line-height="115%" fo:margin-right="0cm" fo:margin-top="0pt" fo:margin-bottom="0pt" fo:border="none"/>
      <style:text-properties/>
    </style:style>
    <style:style style:family="text" style:name="T1165">
      <style:text-properties fo:color="#1f1f1f" fo:font-family="Arial" style:font-family-asian="Arial" style:font-family-complex="Arial" fo:font-size="12pt"/>
    </style:style>
    <style:style style:parent-style-name="668" style:list-style-name="WWNum37" style:family="paragraph" style:name="P718">
      <style:paragraph-properties fo:line-height="115%" fo:margin-right="0cm" fo:margin-top="0pt" fo:margin-bottom="0pt" fo:border="none"/>
      <style:text-properties/>
    </style:style>
    <style:style style:family="text" style:name="T1166">
      <style:text-properties fo:color="#1f1f1f" fo:font-family="Arial" style:font-family-asian="Arial" style:font-family-complex="Arial" fo:font-size="12pt"/>
    </style:style>
    <style:style style:parent-style-name="668" style:list-style-name="WWNum37" style:family="paragraph" style:name="P719">
      <style:paragraph-properties fo:line-height="115%" fo:margin-right="0cm" fo:margin-top="0pt" fo:margin-bottom="0pt" fo:border="none"/>
      <style:text-properties/>
    </style:style>
    <style:style style:family="text" style:name="T1167">
      <style:text-properties fo:color="#1f1f1f" fo:font-family="Arial" style:font-family-asian="Arial" style:font-family-complex="Arial" fo:font-size="12pt"/>
    </style:style>
    <style:style style:parent-style-name="668" style:list-style-name="WWNum37" style:family="paragraph" style:name="P720">
      <style:paragraph-properties fo:line-height="115%" fo:margin-right="0cm" fo:margin-top="0pt" fo:margin-bottom="0pt" fo:border="none"/>
      <style:text-properties/>
    </style:style>
    <style:style style:family="text" style:name="T1168">
      <style:text-properties fo:color="#1f1f1f" fo:font-family="Arial" style:font-family-asian="Arial" style:font-family-complex="Arial" fo:font-size="12pt"/>
    </style:style>
    <style:style style:parent-style-name="142" style:family="paragraph" style:name="P72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69">
      <style:text-properties fo:color="#1f1f1f" fo:font-family="Arial" style:font-family-asian="Arial" style:font-family-complex="Arial" fo:font-size="12pt" fo:font-weight="bold"/>
    </style:style>
    <style:style style:family="paragraph" style:name="P722">
      <style:paragraph-properties fo:line-height="115%" fo:margin-left="0cm" fo:margin-right="0cm" fo:text-indent="0cm" fo:margin-top="0pt" fo:margin-bottom="0pt" fo:border="none"/>
      <style:text-properties/>
    </style:style>
    <style:style style:family="text" style:name="T1170">
      <style:text-properties fo:color="#1f1f1f" fo:font-family="Arial" style:font-family-asian="Arial" style:font-family-complex="Arial" fo:font-size="12pt"/>
    </style:style>
    <style:style style:family="table" style:name="ta8">
      <style:paragraph-properties fo:line-height="100%" fo:margin-bottom="0pt"/>
      <style:table-properties style:width="12.14cm" fo:margin-left="0cm" table:align="left" style:use-optimal-column-width="true"/>
    </style:style>
    <style:style style:family="table-column" style:name="co19">
      <style:table-column-properties style:column-width="1.281cm" style:use-optimal-column-width="true"/>
    </style:style>
    <style:style style:family="table-column" style:name="co20">
      <style:table-column-properties style:column-width="5.525cm" style:use-optimal-column-width="true"/>
    </style:style>
    <style:style style:family="table-column" style:name="co21">
      <style:table-column-properties style:column-width="5.333cm" style:use-optimal-column-width="true"/>
    </style:style>
    <style:style style:family="table-row" style:name="ro34">
      <style:table-row-properties/>
    </style:style>
    <style:style style:family="table-cell" style:name="ce9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23">
      <style:paragraph-properties style:line-height-at-least="12pt" fo:margin-top="0pt" fo:margin-bottom="0pt"/>
      <style:text-properties/>
    </style:style>
    <style:style style:family="text" style:name="T1171">
      <style:text-properties fo:color="#1f1f1f" fo:font-family="Arial" style:font-family-asian="Arial" style:font-family-complex="Arial" fo:font-size="12pt" fo:font-weight="bold"/>
    </style:style>
    <style:style style:family="table-cell" style:name="ce9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24">
      <style:paragraph-properties style:line-height-at-least="12pt" fo:margin-top="0pt" fo:margin-bottom="0pt"/>
      <style:text-properties/>
    </style:style>
    <style:style style:family="text" style:name="T1172">
      <style:text-properties fo:color="#1f1f1f" fo:font-family="Arial" style:font-family-asian="Arial" style:font-family-complex="Arial" fo:font-size="12pt" fo:font-weight="bold"/>
    </style:style>
    <style:style style:family="table-cell" style:name="ce9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25">
      <style:paragraph-properties style:line-height-at-least="12pt" fo:margin-top="0pt" fo:margin-bottom="0pt"/>
      <style:text-properties/>
    </style:style>
    <style:style style:family="text" style:name="T1173">
      <style:text-properties fo:color="#1f1f1f" fo:font-family="Arial" style:font-family-asian="Arial" style:font-family-complex="Arial" fo:font-size="12pt" fo:font-weight="bold"/>
    </style:style>
    <style:style style:family="table-row" style:name="ro35">
      <style:table-row-properties/>
    </style:style>
    <style:style style:family="table-cell" style:name="ce9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26">
      <style:paragraph-properties style:line-height-at-least="12pt" fo:margin-top="0pt" fo:margin-bottom="0pt"/>
      <style:text-properties/>
    </style:style>
    <style:style style:family="text" style:name="T1174">
      <style:text-properties fo:color="#1f1f1f" fo:font-family="Arial" style:font-family-asian="Arial" style:font-family-complex="Arial" fo:font-size="12pt"/>
    </style:style>
    <style:style style:family="table-cell" style:name="ce9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27">
      <style:paragraph-properties style:line-height-at-least="12pt" fo:margin-top="0pt" fo:margin-bottom="0pt"/>
      <style:text-properties/>
    </style:style>
    <style:style style:family="text" style:name="T1175">
      <style:text-properties fo:color="#1f1f1f" fo:font-family="Arial" style:font-family-asian="Arial" style:font-family-complex="Arial" fo:font-size="12pt"/>
    </style:style>
    <style:style style:family="table-cell" style:name="ce9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28">
      <style:paragraph-properties style:line-height-at-least="12pt" fo:margin-top="0pt" fo:margin-bottom="0pt"/>
      <style:text-properties/>
    </style:style>
    <style:style style:family="text" style:name="T1176">
      <style:text-properties fo:color="#1f1f1f" fo:font-family="Arial" style:font-family-asian="Arial" style:font-family-complex="Arial" fo:font-size="12pt"/>
    </style:style>
    <style:style style:family="table-row" style:name="ro36">
      <style:table-row-properties/>
    </style:style>
    <style:style style:family="table-cell" style:name="ce9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29">
      <style:paragraph-properties style:line-height-at-least="12pt" fo:margin-top="0pt" fo:margin-bottom="0pt"/>
      <style:text-properties/>
    </style:style>
    <style:style style:family="text" style:name="T1177">
      <style:text-properties fo:color="#1f1f1f" fo:font-family="Arial" style:font-family-asian="Arial" style:font-family-complex="Arial" fo:font-size="12pt"/>
    </style:style>
    <style:style style:family="table-cell" style:name="ce9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30">
      <style:paragraph-properties style:line-height-at-least="12pt" fo:margin-top="0pt" fo:margin-bottom="0pt"/>
      <style:text-properties/>
    </style:style>
    <style:style style:family="text" style:name="T1178">
      <style:text-properties fo:color="#1f1f1f" fo:font-family="Arial" style:font-family-asian="Arial" style:font-family-complex="Arial" fo:font-size="12pt"/>
    </style:style>
    <style:style style:family="table-cell" style:name="ce9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31">
      <style:paragraph-properties style:line-height-at-least="12pt" fo:margin-top="0pt" fo:margin-bottom="0pt"/>
      <style:text-properties/>
    </style:style>
    <style:style style:family="text" style:name="T1179">
      <style:text-properties fo:color="#1f1f1f" fo:font-family="Arial" style:font-family-asian="Arial" style:font-family-complex="Arial" fo:font-size="12pt"/>
    </style:style>
    <style:style style:family="paragraph" style:name="P732">
      <style:paragraph-properties fo:line-height="115%" fo:margin-left="0cm" fo:margin-right="0cm" fo:text-indent="0cm" fo:margin-top="0pt" fo:margin-bottom="0pt" fo:border="none"/>
      <style:text-properties/>
    </style:style>
    <style:style style:family="text" style:name="T1180">
      <style:text-properties fo:color="#1f1f1f" fo:font-family="Arial" style:font-family-asian="Arial" style:font-family-complex="Arial" fo:font-size="12pt"/>
    </style:style>
    <style:style style:parent-style-name="141" style:family="paragraph" style:name="P73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81">
      <style:text-properties fo:color="#1f1f1f" fo:font-family="Arial" style:font-family-asian="Arial" style:font-family-complex="Arial" fo:font-size="14pt" fo:font-weight="bold"/>
    </style:style>
    <style:style style:parent-style-name="668" style:list-style-name="WWNum37" style:family="paragraph" style:name="P734">
      <style:paragraph-properties fo:line-height="115%" fo:margin-right="0cm" fo:margin-top="0pt" fo:margin-bottom="0pt" fo:border="none"/>
      <style:text-properties/>
    </style:style>
    <style:style style:family="text" style:name="T1182">
      <style:text-properties fo:color="#1f1f1f" fo:font-family="Arial" style:font-family-asian="Arial" style:font-family-complex="Arial" fo:font-size="12pt"/>
    </style:style>
    <style:style style:parent-style-name="668" style:list-style-name="WWNum37" style:family="paragraph" style:name="P735">
      <style:paragraph-properties fo:line-height="115%" fo:margin-right="0cm" fo:margin-top="0pt" fo:margin-bottom="0pt" fo:border="none"/>
      <style:text-properties/>
    </style:style>
    <style:style style:family="text" style:name="T1183">
      <style:text-properties fo:color="#1f1f1f" fo:font-family="Arial" style:font-family-asian="Arial" style:font-family-complex="Arial" fo:font-size="12pt"/>
    </style:style>
    <style:style style:parent-style-name="668" style:list-style-name="WWNum37" style:family="paragraph" style:name="P736">
      <style:paragraph-properties fo:line-height="115%" fo:margin-right="0cm" fo:margin-top="0pt" fo:margin-bottom="0pt" fo:border="none"/>
      <style:text-properties/>
    </style:style>
    <style:style style:family="text" style:name="T1184">
      <style:text-properties fo:color="#1f1f1f" fo:font-family="Arial" style:font-family-asian="Arial" style:font-family-complex="Arial" fo:font-size="12pt"/>
    </style:style>
    <style:style style:parent-style-name="668" style:list-style-name="WWNum37" style:family="paragraph" style:name="P737">
      <style:paragraph-properties fo:line-height="115%" fo:margin-right="0cm" fo:margin-top="0pt" fo:margin-bottom="0pt" fo:border="none"/>
      <style:text-properties/>
    </style:style>
    <style:style style:family="text" style:name="T1185">
      <style:text-properties fo:color="#1f1f1f" fo:font-family="Arial" style:font-family-asian="Arial" style:font-family-complex="Arial" fo:font-size="12pt"/>
    </style:style>
    <style:style style:family="paragraph" style:name="P738">
      <style:paragraph-properties/>
      <style:text-properties fo:font-family="Arial" style:font-family-asian="Arial" style:font-family-complex="Arial" fo:font-size="12pt" style:font-size-complex="12pt"/>
    </style:style>
    <style:style style:family="text" style:name="T1186">
      <style:text-properties/>
    </style:style>
    <style:style style:family="text" style:name="T1187">
      <style:text-properties/>
    </style:style>
    <style:style style:family="text" style:name="T1188">
      <style:text-properties/>
    </style:style>
    <style:style style:family="paragraph" style:name="P739">
      <style:paragraph-properties fo:line-height="115%" fo:margin-left="0cm" fo:margin-right="0cm" fo:text-indent="0cm" fo:margin-top="0pt" fo:margin-bottom="0pt" fo:break-before="page" fo:border="none"/>
      <style:text-properties/>
    </style:style>
    <style:style style:family="text" style:name="T1189">
      <style:text-properties fo:color="#1f1f1f" fo:font-family="Arial" style:font-family-asian="Arial" style:font-family-complex="Arial" fo:font-size="12pt"/>
    </style:style>
    <style:style style:parent-style-name="141" style:family="paragraph" style:name="P74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90">
      <style:text-properties fo:color="#1f1f1f" fo:font-family="Arial" style:font-family-asian="Arial" style:font-family-complex="Arial" fo:font-size="14pt" fo:font-weight="bold"/>
    </style:style>
    <style:style style:family="paragraph" style:name="P741">
      <style:paragraph-properties fo:line-height="115%" fo:margin-left="0cm" fo:margin-right="0cm" fo:text-indent="0cm" fo:margin-top="0pt" fo:margin-bottom="0pt" fo:border="none"/>
      <style:text-properties/>
    </style:style>
    <style:style style:family="text" style:name="T1191">
      <style:text-properties fo:color="#1f1f1f" fo:font-family="Arial" style:font-family-asian="Arial" style:font-family-complex="Arial" fo:font-size="12pt"/>
    </style:style>
    <style:style style:parent-style-name="142" style:family="paragraph" style:name="P74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92">
      <style:text-properties fo:color="#1f1f1f" fo:font-family="Arial" style:font-family-asian="Arial" style:font-family-complex="Arial" fo:font-size="12pt" fo:font-weight="bold"/>
    </style:style>
    <style:style style:family="paragraph" style:name="P743">
      <style:paragraph-properties fo:line-height="115%" fo:margin-left="0cm" fo:margin-right="0cm" fo:text-indent="0cm" fo:margin-top="0pt" fo:margin-bottom="0pt" fo:border="none"/>
      <style:text-properties/>
    </style:style>
    <style:style style:family="text" style:name="T1193">
      <style:text-properties fo:color="#1f1f1f" fo:font-family="Arial" style:font-family-asian="Arial" style:font-family-complex="Arial" fo:font-size="12pt"/>
    </style:style>
    <style:style style:parent-style-name="142" style:family="paragraph" style:name="P74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94">
      <style:text-properties fo:color="#1f1f1f" fo:font-family="Arial" style:font-family-asian="Arial" style:font-family-complex="Arial" fo:font-size="12pt" fo:font-weight="bold"/>
    </style:style>
    <style:style style:family="paragraph" style:name="P745">
      <style:paragraph-properties fo:line-height="115%" fo:margin-left="0cm" fo:margin-right="0cm" fo:text-indent="0cm" fo:margin-top="0pt" fo:margin-bottom="0pt" fo:border="none"/>
      <style:text-properties/>
    </style:style>
    <style:style style:family="text" style:name="T1195">
      <style:text-properties fo:color="#1f1f1f" fo:font-family="Arial" style:font-family-asian="Arial" style:font-family-complex="Arial" fo:font-size="12pt"/>
    </style:style>
    <style:style style:parent-style-name="142" style:family="paragraph" style:name="P74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96">
      <style:text-properties fo:color="#1f1f1f" fo:font-family="Arial" style:font-family-asian="Arial" style:font-family-complex="Arial" fo:font-size="12pt" fo:font-weight="bold"/>
    </style:style>
    <style:style style:family="paragraph" style:name="P747">
      <style:paragraph-properties fo:line-height="115%" fo:margin-left="0cm" fo:margin-right="0cm" fo:text-indent="0cm" fo:margin-top="0pt" fo:margin-bottom="0pt" fo:border="none"/>
      <style:text-properties/>
    </style:style>
    <style:style style:family="text" style:name="T1197">
      <style:text-properties fo:color="#1f1f1f" fo:font-family="Arial" style:font-family-asian="Arial" style:font-family-complex="Arial" fo:font-size="12pt"/>
    </style:style>
    <style:style style:parent-style-name="142" style:family="paragraph" style:name="P74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98">
      <style:text-properties fo:color="#1f1f1f" fo:font-family="Arial" style:font-family-asian="Arial" style:font-family-complex="Arial" fo:font-size="12pt" fo:font-weight="bold"/>
    </style:style>
    <style:style style:family="paragraph" style:name="P749">
      <style:paragraph-properties fo:line-height="115%" fo:margin-left="0cm" fo:margin-right="0cm" fo:text-indent="0cm" fo:margin-top="0pt" fo:margin-bottom="0pt" fo:border="none"/>
      <style:text-properties/>
    </style:style>
    <style:style style:family="text" style:name="T1199">
      <style:text-properties fo:color="#1f1f1f" fo:font-family="Arial" style:font-family-asian="Arial" style:font-family-complex="Arial" fo:font-size="12pt"/>
    </style:style>
    <style:style style:parent-style-name="141" style:family="paragraph" style:name="P75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00">
      <style:text-properties fo:color="#1f1f1f" fo:font-family="Arial" style:font-family-asian="Arial" style:font-family-complex="Arial" fo:font-size="14pt" fo:font-weight="bold"/>
    </style:style>
    <style:style style:parent-style-name="668" style:list-style-name="WWNum38" style:family="paragraph" style:name="P751">
      <style:paragraph-properties fo:line-height="115%" fo:margin-right="0cm" fo:margin-top="0pt" fo:margin-bottom="0pt" fo:border="none"/>
      <style:text-properties/>
    </style:style>
    <style:style style:family="text" style:name="T1201">
      <style:text-properties fo:color="#1f1f1f" fo:font-family="Arial" style:font-family-asian="Arial" style:font-family-complex="Arial" fo:font-size="12pt"/>
    </style:style>
    <style:style style:parent-style-name="668" style:list-style-name="WWNum38" style:family="paragraph" style:name="P752">
      <style:paragraph-properties fo:line-height="115%" fo:margin-right="0cm" fo:margin-top="0pt" fo:margin-bottom="0pt" fo:border="none"/>
      <style:text-properties/>
    </style:style>
    <style:style style:family="text" style:name="T1202">
      <style:text-properties fo:color="#1f1f1f" fo:font-family="Arial" style:font-family-asian="Arial" style:font-family-complex="Arial" fo:font-size="12pt"/>
    </style:style>
    <style:style style:parent-style-name="668" style:list-style-name="WWNum38" style:family="paragraph" style:name="P753">
      <style:paragraph-properties fo:line-height="115%" fo:margin-right="0cm" fo:margin-top="0pt" fo:margin-bottom="0pt" fo:border="none"/>
      <style:text-properties/>
    </style:style>
    <style:style style:family="text" style:name="T1203">
      <style:text-properties fo:color="#1f1f1f" fo:font-family="Arial" style:font-family-asian="Arial" style:font-family-complex="Arial" fo:font-size="12pt"/>
    </style:style>
    <style:style style:parent-style-name="668" style:list-style-name="WWNum38" style:family="paragraph" style:name="P754">
      <style:paragraph-properties fo:line-height="115%" fo:margin-right="0cm" fo:margin-top="0pt" fo:margin-bottom="0pt" fo:border="none"/>
      <style:text-properties/>
    </style:style>
    <style:style style:family="text" style:name="T1204">
      <style:text-properties fo:color="#1f1f1f" fo:font-family="Arial" style:font-family-asian="Arial" style:font-family-complex="Arial" fo:font-size="12pt"/>
    </style:style>
    <style:style style:parent-style-name="668" style:list-style-name="WWNum1" style:family="paragraph" style:name="P755">
      <style:paragraph-properties fo:line-height="115%" fo:margin-right="0cm" fo:margin-top="0pt" fo:margin-bottom="0pt" fo:border="none"/>
      <style:text-properties fo:font-family="Arial" style:font-family-asian="Arial" style:font-family-complex="Arial" fo:font-size="12pt" style:font-size-complex="12pt"/>
    </style:style>
    <style:style style:family="text" style:name="T1205">
      <style:text-properties fo:color="#1f1f1f" fo:font-family="Arial" style:font-family-asian="Arial" style:font-family-complex="Arial" fo:font-size="12pt"/>
    </style:style>
    <style:style style:family="text" style:name="T1206">
      <style:text-properties fo:font-family="Arial" style:font-family-asian="Arial" style:font-family-complex="Arial" fo:font-size="12pt"/>
    </style:style>
    <style:style style:family="paragraph" style:name="P756">
      <style:paragraph-properties fo:break-before="page"/>
      <style:text-properties/>
    </style:style>
  </office:automatic-styles>
  <office:body>
    <office:text text:use-soft-page-breaks="true">
      <text:p text:style-name="P33"><text:span text:style-name="T374">[🟢 Online Mode | 26.06.05_11:56:09]</text:span><text:span/></text:p>
      <text:p text:style-name="P34"><text:span text:style-name="T375">70. 정광명의 고요를 깨우는 바르도의 시작</text:span><text:span/></text:p>
      <text:p text:style-name="P35"><text:span text:style-name="T376">🔑 핵심 키워드: 죽음의 정광명, 미세한 풍심, 불괴명점, 바르도의 의생신</text:span><text:span/></text:p>
      <text:p text:style-name="P36"><text:span text:style-name="T377">🌊 고요한 호수에 이는 미세한 파동</text:span><text:span/></text:p>
      <text:p text:style-name="P37"><text:span text:style-name="T378">죽음의 순간에 맞이하는 정광명의 마음은 아무런 흔들림도 없는 깊은 침묵의 상태야. 하지만 이 완벽한 고요함 속에 영원히 머무는 것이 아니라, 어느 순간 내면 깊은 곳에서 움찔하는 미세한 진동이 일어나게 돼. 알람 소리도 없는 깊은 잠 속에서 몸이 스스로 알아차리고 눈을 뜨기 직전 가볍게 뒤척이는 것처럼, 의식이 다음 단계로 나아가기 위해 깨어나는 첫 번째 움직임이지.</text:span><text:span/></text:p>
      <text:p text:style-name="P38"><text:span text:style-name="T379">🚪 심장 속 비밀의 문이 열리는 순간</text:span><text:span/></text:p>
      <text:p text:style-name="P39"><text:span text:style-name="T380">이 미세한 움직임과 함께 우리 몸에서 가장 깊고 단단한 생명의 거점인 심장 속 불괴명점이 반응을 시작해. 평생 단단하게 결합해 있던 하얀 보리심과 붉은 보리심이 서서히 분리되면서 그 사이에 아주 작은 틈새가 열리게 되지. 이것은 우주선이 새로운 우주로 나아가기 위해 결합해 있던 안전 장치를 해제하고 마침내 메인 해치를 활짝 열어젖히는 극적인 순간과 같아.</text:span><text:span/></text:p>
      <text:p text:style-name="P40"><text:span text:style-name="T381">🕊️ 옛집을 떠나 날아오르는 생명의 바람</text:span><text:span/></text:p>
      <text:p text:style-name="P41"><text:span text:style-name="T382">비밀의 문이 열리면 극도로 미세한 의식과 에너지의 결합체인 풍심이 그 작은 틈새를 통해 몸 밖으로 멀리 뛰쳐나오게 돼. 그동안 영혼을 가두고 있던 무겁고 거친 육체라는 옷을 미련 없이 완전히 벗어던지는 과정이지. 마치 새장 문이 열리자마자 그동안 갇혀 있던 새가 푸른 하늘을 향해 힘차게 날개짓을 하며 밖으로 솟구쳐 오르는 모습과 아주 비슷해.</text:span><text:span/></text:p>
      <text:p text:style-name="P42"><text:span text:style-name="T383">🦋 의식으로 이루어진 새로운 몸의 탄생</text:span><text:span/></text:p>
      <text:p text:style-name="P43"><text:span text:style-name="T384">육체를 완전히 빠져나온 미세한 풍심은 곧바로 바르도라는 중간 세계에서 살아갈 새로운 몸인 의생신을 이루게 돼. 물질적인 살과 뼈로 만들어진 몸이 아니라 순수한 의식의 힘으로만 형성된 아주 유연하고 자유로운 상태의 몸이지. 투박하고 무거운 번데기의 허물을 완전히 벗어던지고 찬란한 날개를 펼치며 완전히 새로운 존재로 거듭나는 나비의 탄생처럼 말이야.</text:span><text:span/></text:p>
      <text:p text:style-name="P44"><text:span text:style-name="T385">📝 핵심 요약</text:span><text:span/></text:p>
      <text:list text:style-name="WWNum1" text:continue-numbering="true">
        <text:list-item>
          <text:p text:style-name="P45"><text:span text:style-name="T386">아무런 움직임이 없던 죽음의 정광명 상태 끝에 내면에서 미세한 움직임이 시작됨.</text:span><text:span/></text:p>
        </text:list-item>
        <text:list-item>
          <text:p text:style-name="P46"><text:span text:style-name="T387">심장 속 생명의 거점에서 하얀 보리심과 붉은 보리심이 분리되며 아주 작은 틈새가 열림.</text:span><text:span/></text:p>
        </text:list-item>
        <text:list-item>
          <text:p text:style-name="P47"><text:span text:style-name="T388">극도로 미세한 풍심이 그 틈을 통해 옛 육체를 완전히 버리고 몸 밖으로 빠져나옴.</text:span><text:span/></text:p>
        </text:list-item>
        <text:list-item>
          <text:p text:style-name="P48"><text:span text:style-name="T389">거친 물질의 제약을 벗어나 순수한 의식으로 이루어진 바르도의 의생신을 성취함.</text:span><text:span text:style-name="T390"/></text:p>
        </text:list-item>
      </text:list>
      <text:p text:style-name="P49"><text:span text:style-name="T391"><text:soft-page-break/></text:span><text:span text:style-name="T392"/><text:span text:style-name="T393"/></text:p>
      <text:p text:style-name="P50"><text:span text:style-name="T394">71. 음양 에너지의 분리와 육체의 최종 마감</text:span><text:span/></text:p>
      <text:p text:style-name="P51"><text:span text:style-name="T395">🔑 핵심 키워드: 하얀 보리심, 붉은 보리심, 심장, 에너지의 분리, 육체의 마감</text:span><text:span/></text:p>
      <text:p text:style-name="P52"><text:span text:style-name="T396">🛑 생명을 지탱하던 중심축의 해체</text:span><text:span/></text:p>
      <text:p text:style-name="P53"><text:span text:style-name="T397">죽음의 가장 마지막 순간에 이르면 우리 몸을 지탱하던 가장 깊은 에너지의 중심지인 심장에서 놀라운 변화가 일어나. 평소에는 우리 몸의 생명력을 유지하기 위해 심장 중심에 단단히 묶여 있던 두 가지 근원적인 에너지, 즉 하얀 보리심과 붉은 보리심이 마침내 서로 결합을 풀고 분리되는 거지. 이것은 마치 건물을 단단하게 받치고 있던 거대한 두 개의 기둥이 마침내 제 역할을 다하고 제자리에서 벗어나는 것과 같아. 이 두 에너지가 갈라지는 순간, 육체라는 물리적인</text:span><text:span text:style-name="T398"> 공간은 영혼과의 연결을 완전히 마무리하게 돼.</text:span><text:span/></text:p>
      <text:p text:style-name="P54"><text:span text:style-name="T399">❄️ 하얀 보리심의 하강과 아래로의 방출</text:span><text:span/></text:p>
      <text:p text:style-name="P55"><text:span text:style-name="T400">심장에서 풀려난 하얀 보리심은 몸의 중심 통로를 따라 아래쪽으로 천천히 내려가기 시작해. 그리고 마침내 몸의 가장 아래쪽에 있는 성기를 통해 몸 바깥으로 배출되지. 이 현상은 마치 겨울철 지붕에 맺혀 있던 고드름이 따뜻한 햇살에 녹아내려 땅으로 톡 떨어지는 자연스러운 흐름과 비슷해. 아래로 향하는 차갑고 순수한 에너지가 자기 갈 길을 찾아 육체의 밑바닥 문을 열고 나가는 과정이라고 보면 돼.</text:span><text:span/></text:p>
      <text:p text:style-name="P56"><text:span text:style-name="T401">🔥 붉은 보리심의 상승과 위로의 분출</text:span><text:span/></text:p>
      <text:p text:style-name="P57"><text:span text:style-name="T402">하얀 에너지가 아래로 내려가는 것과 동시에, 심장에 있던 붉은 보리심은 정반대로 몸의 중심 통로를 타고 위를 향해 거침없이 올라가. 그렇게 위로 치솟은 에너지는 코를 통해 몸 바깥의 세상으로 빠져나가게 되지. 이것은 주전자의 물이 끓을 때 뜨거운 김이 뚜껑의 구멍을 통해 위로 뿜어져 나오는 현상이나, 열기구가 하늘을 향해 가볍게 떠오르는 모습과 아주 닮아 있어. 위로 향하는 따뜻하고 역동적인 에너지가 육체의 위쪽 문을 통해 탈출하는 거야.</text:span><text:span/></text:p>
      <text:p text:style-name="P58"><text:span text:style-name="T403">🚪 육체의 문이 열리고 시작되는 완전한 이탈</text:span><text:span/></text:p>
      <text:p text:style-name="P59"><text:span text:style-name="T404">이처럼 위와 아래라는 정반대의 방향으로 두 에너지가 동시에 빠져나가는 현상은, 영혼이 거주하던 육체라는 집의 앞문과 뒷문이 한꺼번에 활짝 열리는 것과 같아. 이 감각적인 배출을 끝으로 우리 의식은 단단하게 얽매여 있던 신체적 구속에서 완전히 벗어나게 되지. 마치 오랜 여행을 마치고 호텔방을 나오면서 앞문과 창문을 열어 환기를 시키고 열쇠를 반납하는 것처럼, 우리 존재가 육신이라는 공간을 완벽하게 비워내고 새로운 차원으로 이동하는 마지막 신호라고 이해하면 </text:span><text:span text:style-name="T405">돼.</text:span><text:span/></text:p>
      <text:p text:style-name="P60"><text:span text:style-name="T406">📝 핵심 요약</text:span><text:span/></text:p>
      <text:list text:style-name="WWNum2" text:continue-numbering="true">
        <text:list-item>
          <text:p text:style-name="P61"><text:span text:style-name="T407">죽음의 최종 단계에서 심장에 모여 있던 하얀 보리심과 붉은 보리심이 분리된다.</text:span><text:span/></text:p>
        </text:list-item>
        <text:list-item>
          <text:p text:style-name="P62"><text:span text:style-name="T408">하얀 보리심은 중심 통로를 따라 아래로 내려가 성기를 통해 몸 밖으로 배출된다.</text:span><text:span/></text:p>
        </text:list-item>
        <text:list-item>
          <text:p text:style-name="P63"><text:span text:style-name="T409">붉은 보리심은 위로 올라가 코를 통해 바깥으로 빠져나간다.</text:span><text:span/></text:p>
        </text:list-item>
        <text:list-item>
          <text:p text:style-name="P64"><text:span text:style-name="T410">두 에너지의 동시 배출은 의식이 육체의 구속을 벗어나 완전히 이탈했음을 알리는 최종 신호다.</text:span><text:span/></text:p>
        </text:list-item>
      </text:list>
      <text:p text:style-name="P65"><text:span text:style-name="T411"><text:soft-page-break/></text:span><text:span text:style-name="T412"/><text:span text:style-name="T413"/></text:p>
      <text:p text:style-name="P66"><text:span text:style-name="T414">[🔴 Offline Mode | 26.06.05_11:56:25]</text:span><text:span/></text:p>
      <text:p text:style-name="P67"><text:span text:style-name="T415">72. 오광명풍과 바르도 몸의 위대한 형성</text:span><text:span/></text:p>
      <text:p text:style-name="P68"><text:span text:style-name="T416">🔑 핵심 키워드: 오광명풍, 바르도, 근취인, 조연, 바람의 몸</text:span><text:span/></text:p>
      <text:p text:style-name="P69"><text:span text:style-name="T417">🌪️ 오광명풍, 새로운 존재를 만드는 신비로운 씨앗</text:span><text:span/></text:p>
      <text:p text:style-name="P70"><text:span text:style-name="T418">죽음을 맞이하는 순간, 우리 의식의 가장 깊은 곳에 있는 죽음의 정광명을 실어 나르는 아주 특별한 운반체가 깨어나. 이것을 땅, 물, 불, 바람, 허공이라는 다섯 가지 미세한 원소들이 완벽하게 결합한 오광명풍이라고 불러. 이 오광명풍은 다음 생으로 넘어가기 전의 중간 단계인 바르도에서 우리가 갖게 될 새로운 바람의 몸을 만드는 결정적인 재료가 된단다. 마치 새로운 건물을 짓기 위해 세상의 모든 좋은 재료를 압축해 놓은 완벽한 마법의 찰흙과 같은 존재이지.</text:span><text:span/></text:p>
      <text:p text:style-name="P71"><text:span text:style-name="T419">🧠 정광명의 마음과 바람의 유기적인 협력</text:span><text:span/></text:p>
      <text:p text:style-name="P72"><text:span text:style-name="T420">여기서 오광명풍과 죽음의 정광명 마음은 아주 긴밀하게 역할을 나누어 유기적으로 협력하게 돼. 오광명풍이 바르도의 몸을 만드는 핵심 재료가 되는 동안, 정광명의 마음은 그 몸이 잘 만들어지도록 옆에서 돕는 보조적인 역할을 맡지. 반대로 바르도에서 우리가 갖게 될 새로운 마음을 만들 때는 정광명의 마음이 핵심 재료가 되고, 오광명풍이 이를 돕는 보조자가 된단다. 이것은 마치 유능한 건축가와 최고급 자재가 서로 손을 잡고 상황에 맞춰 완벽한 집과 인테리어를 완</text:span><text:span text:style-name="T421">성해 나가는 과정과 똑같아.</text:span><text:span/></text:p>
      <text:p text:style-name="P73"><text:span text:style-name="T422">👤 다음 생의 모습을 투영하는 바람의 몸</text:span><text:span/></text:p>
      <text:p text:style-name="P74"><text:span text:style-name="T423">이러한 마음과 에너지의 정교한 상호작용을 통해서, 우리는 마침내 바르도에서 활동할 수 있는 정교한 바람의 몸을 성취하게 돼. 신기하게도 이 바람의 몸은 아무런 형태가 없는 유령 같은 것이 아니라, 우리가 장차 태어나게 될 다음 세계의 유정의 모습을 그대로 본떠서 형상화된단다. 컴퓨터 그래픽으로 다음 번에 플레이할 캐릭터의 아바타를 정밀하게 3D 프린팅으로 뽑아내는 것처럼, 바람의 기운이 다음 생의 등대 역할을 할 구체적인 신체적 형상을 고스란히 갖추게 되</text:span><text:span text:style-name="T424">는 거지.</text:span><text:span/></text:p>
      <text:p text:style-name="P75"><text:span text:style-name="T425">🦋 낡은 업보의 허물을 벗고 일어서는 순간</text:span><text:span/></text:p>
      <text:p text:style-name="P76"><text:span text:style-name="T426">이렇게 새로운 바람의 몸이 완벽하게 갖추어지면, 존재는 마침내 이전 생의 업보로 인해 무겁고 딱딱하게 굳어버린 죽은 육체로부터 완전히 분리되어 밖으로 깨어나게 돼. 이것은 마치 오랜 시간 답답한 고치 속에 갇혀 있던 애벌레가 허물을 완전히 벗어던지고 눈부신 날개를 펼치며 하늘로 날아오르는 나비의 순간과 아주 비슷하단다. 무거운 과거의 육체적 구속에서 벗어나, 순수한 에너지의 몸으로 새로운 차원의 여정을 향해 실제로 첫발을 내딛는 엄숙한 성취인 셈이야.</text:span><text:span/></text:p>
      <text:p text:style-name="P77"><text:span text:style-name="T427">📝 핵심 요약</text:span><text:span/></text:p>
      <text:list text:style-name="WWNum3" text:continue-numbering="true">
        <text:list-item>
          <text:p text:style-name="P78"><text:span text:style-name="T428">다섯 원소의 결합체인 오광명풍은 바르도 몸의 직접적 원인이자 마음의 보조적 조건이 됨.</text:span><text:span/></text:p>
        </text:list-item>
        <text:list-item>
          <text:p text:style-name="P79"><text:span text:style-name="T429">죽음의 정광명 마음은 바르도 마음의 직접적 원인이자 몸의 보조적 조건으로 작용함.</text:span><text:span/></text:p>
        </text:list-item>
        <text:list-item>
          <text:p text:style-name="P80"><text:span text:style-name="T430">두 요소의 협력으로 장차 태어날 세계의 존재 모습을 한 정교한 바람의 몸이 완성됨.</text:span><text:span/></text:p>
        </text:list-item>
        <text:list-item>
          <text:p text:style-name="P81"><text:span text:style-name="T431">새롭게 성취된 바람의 몸은 과거 업보로 받은 무거운 육체의 허물을 벗고 실제로 분리됨.</text:span><text:span/></text:p>
        </text:list-item>
      </text:list>
      <text:p text:style-name="P82"><text:span text:style-name="T432"><text:soft-page-break/></text:span><text:span text:style-name="T433"/><text:span text:style-name="T434"/></text:p>
      <text:p text:style-name="P83"><text:span text:style-name="T435">73. 죽음의 소멸과 바르도의 동시적 성취</text:span><text:span/></text:p>
      <text:p text:style-name="P84"><text:span text:style-name="T436">🔑 핵심 키워드: 역순 과정, 정광명 소멸, 암흑의 마음, 바르도 성취, 동시성</text:span><text:span/></text:p>
      <text:p text:style-name="P85"><text:span text:style-name="T437">🔄 역순으로 회전하는 의식의 톱니바퀴</text:span><text:span/></text:p>
      <text:p text:style-name="P86"><text:span text:style-name="T438">죽음의 가장 깊은 영역인 정광명의 상태에 도달했던 의식은 이제 다시 외부 세계를 향해 거꾸로 나아가기 시작해. 들어올 때 문을 하나씩 닫으며 깊은 동굴로 걸어 들어왔다면, 이제는 동굴 깊은 곳에서부터 다시 밖을 향해 걸어 나가는 역순의 과정이 시작되는 거지. 평소에 우리가 경험하기 힘든 아주 미세한 의식의 흐름이라 생소하게 느껴지겠지만, 자연의 밀물과 썰물처럼 에너지가 다시 바깥으로 퍼져나가는 우주의 거대한 순리라고 이해하면 쉬워.</text:span><text:span/></text:p>
      <text:p text:style-name="P87"><text:span text:style-name="T439">⚡ 세 가지 거대한 사건의 동시 발생</text:span><text:span/></text:p>
      <text:p text:style-name="P88"><text:span text:style-name="T440">이 역순의 출발점에서는 인간의 의식 역사를 통틀어 가장 극적이고 신비로운 세 가지 현상이 한 치의 오차도 없이 한순간에 일어나게 돼. 하나의 스위치를 누르는 순간 전등이 꺼지고, 비상 발전기가 돌며, 새로운 경보음이 울리는 것처럼 정밀하게 맞물려 작동하는 장치와 같지. 이 우주적 동시성을 직관적으로 파악할 수 있도록 구조화된 형태로 보여줄게.</text:span><text:span/></text:p>
      <table:table table:style-name="ta1">
        <table:table-columns>
          <table:table-column table:style-name="co1"/>
          <table:table-column table:style-name="co2"/>
        </table:table-columns>
        <table:table-row table:style-name="ro1" table:default-cell-style-name="ce1">
          <table:table-cell table:style-name="ce2">
            <text:p text:style-name="P89"><text:span text:style-name="T441">동시 일어나는 현상</text:span><text:span/></text:p>
          </table:table-cell>
          <table:table-cell table:style-name="ce3">
            <text:p text:style-name="P90"><text:span text:style-name="T442">의식의 본질적 변화</text:span><text:span/></text:p>
          </table:table-cell>
        </table:table-row>
        <table:table-row table:style-name="ro2" table:default-cell-style-name="ce1">
          <table:table-cell table:style-name="ce4">
            <text:p text:style-name="P91"><text:span text:style-name="T443">죽음의 정광명 소멸</text:span><text:span/></text:p>
          </table:table-cell>
          <table:table-cell table:style-name="ce5">
            <text:p text:style-name="P92"><text:span text:style-name="T444">가장 순수하고 미세한 원초의 빛 상태가 마감됨</text:span><text:span/></text:p>
          </table:table-cell>
        </table:table-row>
        <table:table-row table:style-name="ro3" table:default-cell-style-name="ce1">
          <table:table-cell table:style-name="ce6">
            <text:p text:style-name="P93"><text:span text:style-name="T445">암흑의 마음 발생</text:span><text:span/></text:p>
          </table:table-cell>
          <table:table-cell table:style-name="ce7">
            <text:p text:style-name="P94"><text:span text:style-name="T446">역순의 첫 단계인 정광명에 가까운 어두운 의식이 깨어남</text:span><text:span/></text:p>
          </table:table-cell>
        </table:table-row>
        <table:table-row table:style-name="ro4" table:default-cell-style-name="ce1">
          <table:table-cell table:style-name="ce8">
            <text:p text:style-name="P95"><text:span text:style-name="T447">바르도의 성취</text:span><text:span/></text:p>
          </table:table-cell>
          <table:table-cell table:style-name="ce9">
            <text:p text:style-name="P96"><text:span text:style-name="T448">다음 몸을 받기 전 중간 존재인 영체로 완벽히 전환됨</text:span><text:span/></text:p>
          </table:table-cell>
        </table:table-row>
      </table:table>
      <text:p text:style-name="P97"><text:span text:style-name="T449">🌌 정광명의 꺼짐과 암흑의 발생</text:span><text:span/></text:p>
      <text:p text:style-name="P98"><text:span text:style-name="T450">마음의 원초적인 빛이었던 정광명이 멈추는 바로 그 찰나에, 내면에는 정광명에 가까운 짙은 암흑의 마음이 밀려들어 오게 돼. 아주 밝은 손전등을 켜고 가던 동굴 속에서 갑자기 배터리가 다해 순식간에 칠흑 같은 어둠이 눈앞을 가리는 상황과 비슷하지. 이 어둠은 단순히 아무것도 없는 상태가 아니라, 잠들었던 이분법적인 분별심과 거친 감각들이 다시 깨어나기 위해 준비하는 아주 강력하고 무거운 에너지의 서막이야.</text:span><text:span/></text:p>
      <text:p text:style-name="P99"><text:span text:style-name="T451">🕊️ 중간 존재 바르도로의 완벽한 태어남</text:span><text:span/></text:p>
      <text:p text:style-name="P100"><text:span text:style-name="T452">암흑의 마음이 솟구침과 동시에 의식은 바르도라고 불리는 신비로운 중간 존재의 몸을 완벽하게 성취하게 된단다. 애벌레가 고치 속에서 완전히 녹아내렸다가 전혀 새로운 나비의 형상으로 단숨에 탈바꿈하는 과정과 완벽하게 일치해. 이 상태의 의식 변화는 다음과 같은 특징을 지니고 있어.</text:span><text:span/></text:p>
      <text:list text:style-name="WWNum4" text:continue-numbering="true">
        <text:list-item>
          <text:p text:style-name="P101"><text:span text:style-name="T453">육체의 초월: 물질적인 뼈와 살의 구속에서 완전히 벗어나 순수한 영적인 에너지로만 이루어진 몸을 얻게 돼.</text:span><text:span/></text:p>
        </text:list-item>
        <text:list-item>
          <text:p text:style-name="P102"><text:span text:style-name="T454">새로운 차원의 시작: 이전 생의 육체적 죽음은 완전히 마감되었으며, 다음 생의 모태에 들어가기 전까지 머무는 독특한 중간 여정이 시작됨을 뜻해.</text:span><text:span/></text:p>
        </text:list-item>
      </text:list>
      <text:p text:style-name="P103"><text:span text:style-name="T455">📝 핵심 요약</text:span><text:span/></text:p>
      <text:list text:style-name="WWNum4" text:continue-numbering="true">
        <text:list-item>
          <text:p text:style-name="P104"><text:span text:style-name="T456">죽음의 가장 깊은 빛인 정광명이 끝나면 의식은 해체될 때와 정확히 반대 순서로 다시 깨어나기 시작해.</text:span><text:span/></text:p>
        </text:list-item>
        <text:list-item>
          <text:p text:style-name="P105"><text:span text:style-name="T457">정광명이 소멸하는 바로 그 찰나에 역순의 첫 단계인 어두운 암흑의 마음이 내면에서 솟아나.</text:span><text:span/></text:p>
        </text:list-item>
        <text:list-item>
          <text:p text:style-name="P106"><text:span text:style-name="T458">이와 동시에 육체의 제약을 벗어난 중간 존재인 바르도의 몸이 한 치의 오차도 없이 완성돼.</text:span><text:span/></text:p>
        </text:list-item>
        <text:list-item>
          <text:p text:style-name="P107"><text:span text:style-name="T459">정광명 소멸, 암흑 발생, 바르도 성취라는 세 가지 거대한 사건은 완벽하게 톱니바퀴가 맞물리듯 동시에 일어나며 새로운 여정의 시작을 알려.</text:span><text:span/></text:p>
        </text:list-item>
      </text:list>
      <text:p text:style-name="P108"><text:span text:style-name="T460"><text:soft-page-break/></text:span><text:span text:style-name="T461"/><text:span text:style-name="T462"/></text:p>
      <text:p text:style-name="P109"><text:span text:style-name="T463">[🟢 Online Mode | 26.06.05_11:56:40]</text:span><text:span/></text:p>
      <text:p text:style-name="P110"><text:span text:style-name="T464">74. 저울의 양끝처럼 동시적인 사후의 전환</text:span><text:span/></text:p>
      <text:p text:style-name="P111"><text:span text:style-name="T465">🔑 핵심 키워드: 사유의 소멸, 바르도의 성취, 저울대의 오르내림, 화생, 일시 성취</text:span><text:span/></text:p>
      <text:p text:style-name="P112"><text:span text:style-name="T466">⚖️ 저울추처럼 맞물린 삶과 죽음의 교차점</text:span><text:span/></text:p>
      <text:p text:style-name="P113"><text:span text:style-name="T467">육체의 마지막 순간인 사유가 완전히 끝나는 것과 새로운 차원의 존재인 바르도가 시작되는 것은 어떠한 틈도 없이 동시에 일어나.</text:span><text:span/></text:p>
      <text:p text:style-name="P114"><text:span text:style-name="T468">사유의 소멸 = 바르도의 성취</text:span><text:span/></text:p>
      <text:p text:style-name="P115"><text:span text:style-name="T469">비유하자면 양쪽에 물건을 올려놓은 저울대에서 한쪽이 아래로 내려가는 바로 그 찰나에 반대쪽이 위로 떠오르는 것과 완벽하게 똑같은 원리야. 앞의 상태가 사라짐과 동시에 다음 상태가 생성되는 이 놀라운 연속성은, 우리 생명이 단 한 순간도 끊어지지 않고 흐른다는 것을 뜻하지.</text:span><text:span/></text:p>
      <text:p text:style-name="P116"><text:span text:style-name="T470">📚 위대한 가르침들이 증명하는 찰나의 비밀</text:span><text:span/></text:p>
      <text:p text:style-name="P117"><text:span text:style-name="T471">이러한 동시적인 전환은 수많은 깊이 있는 논전들에서 한목소리로 강조하는 핵심 진리야. 마치 세계적인 석학들이 오랜 시간 연구한 끝에 작성한 완벽한 교과서들이 모두 하나의 정답을 가리키고 있는 것과 같아.</text:span><text:span/></text:p>
      <table:table table:style-name="ta2">
        <table:table-columns>
          <table:table-column table:style-name="co3"/>
          <table:table-column table:style-name="co4"/>
          <table:table-column table:style-name="co5"/>
        </table:table-columns>
        <table:table-row table:style-name="ro5" table:default-cell-style-name="ce10">
          <table:table-cell table:style-name="ce11">
            <text:p text:style-name="P118"><text:span text:style-name="T472">논전 이름</text:span><text:span/></text:p>
          </table:table-cell>
          <table:table-cell table:style-name="ce12">
            <text:p text:style-name="P119"><text:span text:style-name="T473">소속 구분</text:span><text:span/></text:p>
          </table:table-cell>
          <table:table-cell table:style-name="ce13">
            <text:p text:style-name="P120"><text:span text:style-name="T474">핵심 내용</text:span><text:span/></text:p>
          </table:table-cell>
        </table:table-row>
        <table:table-row table:style-name="ro6" table:default-cell-style-name="ce10">
          <table:table-cell table:style-name="ce14">
            <text:p text:style-name="P121"><text:span text:style-name="T475">아비달마집론</text:span><text:span/></text:p>
          </table:table-cell>
          <table:table-cell table:style-name="ce15">
            <text:p text:style-name="P122"><text:span text:style-name="T476">대승</text:span><text:span/></text:p>
          </table:table-cell>
          <table:table-cell table:style-name="ce16">
            <text:p text:style-name="P123"><text:span text:style-name="T477">사유의 소멸과 바르도 성취의 동시성</text:span><text:span/></text:p>
          </table:table-cell>
        </table:table-row>
        <table:table-row table:style-name="ro7" table:default-cell-style-name="ce10">
          <table:table-cell table:style-name="ce17">
            <text:p text:style-name="P124"><text:span text:style-name="T478">구사론</text:span><text:span/></text:p>
          </table:table-cell>
          <table:table-cell table:style-name="ce18">
            <text:p text:style-name="P125"><text:span text:style-name="T479">소승</text:span><text:span/></text:p>
          </table:table-cell>
          <table:table-cell table:style-name="ce19">
            <text:p text:style-name="P126"><text:span text:style-name="T480">저울대의 오르내림과 같은 찰나의 전환</text:span><text:span/></text:p>
          </table:table-cell>
        </table:table-row>
        <table:table-row table:style-name="ro8" table:default-cell-style-name="ce10">
          <table:table-cell table:style-name="ce20">
            <text:p text:style-name="P127"><text:span text:style-name="T481">유가사지론</text:span><text:span/></text:p>
          </table:table-cell>
          <table:table-cell table:style-name="ce21">
            <text:p text:style-name="P128"><text:span text:style-name="T482">미륵보살 논서</text:span><text:span/></text:p>
          </table:table-cell>
          <table:table-cell table:style-name="ce22">
            <text:p text:style-name="P129"><text:span text:style-name="T483">중간 공백이 없는 연속적 성취</text:span><text:span/></text:p>
          </table:table-cell>
        </table:table-row>
      </table:table>
      <text:p text:style-name="P130"><text:span text:style-name="T484">🪄 매개체 없이 홀연히 피어나는 화생의 생명</text:span><text:span/></text:p>
      <text:p text:style-name="P131"><text:span text:style-name="T485">바르도에 진입한 존재는 부모나 자궁 같은 물리적인 매개체를 거치지 않고 홀연히 나타나는 화생의 방식을 취하게 돼. 비유하자면 깜깜한 방하늘에 스위치를 켜자마자 빛이 허공에 곧바로 번지는 것처럼, 혹은 컴퓨터를 켜면 아무런 중간 과정 없이 바탕화면이 인공적으로 짠 하고 나타나는 것과 비슷해. 물질적인 제약이 모두 사라진 순수한 에너지의 형태로 존재가 새롭게 피어나는 순간이지.</text:span><text:span/></text:p>
      <text:p text:style-name="P132"><text:span text:style-name="T486">👤 단 한 순간에 완성되는 새로운 신체</text:span><text:span/></text:p>
      <text:p text:style-name="P133"><text:span text:style-name="T487">화생으로 태어나는 바르도의 존재는 신체의 모든 기관과 팔다리를 순차적으로 기르는 게 아니라, 단 한순간에 완벽한 형태로 성취하게 돼.</text:span><text:span/></text:p>
      <text:list text:style-name="WWNum5" text:continue-numbering="true">
        <text:list-item>
          <text:p text:style-name="P134"><text:span text:style-name="T488">신체 형성의 특징</text:span><text:span/></text:p>
        </text:list-item>
      </text:list>
      <text:list text:style-name="WWNum6" text:continue-numbering="true">
        <text:list-item>
          <text:list>
            <text:list-item>
              <text:p text:style-name="P135"><text:span text:style-name="T489">시간적 측면: 모태에서 자라는 점진적 과정을 건너뛰고 일시에 형성됨</text:span><text:span/></text:p>
            </text:list-item>
            <text:list-item>
              <text:p text:style-name="P136"><text:span text:style-name="T490">구조적 측면: 모든 감각 기관과 팔다리가 완벽한 균형을 갖추고 출현함</text:span><text:span/></text:p>
            </text:list-item>
          </text:list>
        </text:list-item>
      </text:list>
      <text:list text:style-name="WWNum5" text:continue-numbering="true">
        <text:list-item>
          <text:p text:style-name="P137"><text:span text:style-name="T491">직관적 비유: 3D 프린터가 오랜 시간에 걸쳐 재료를 쌓아 올리는 것이 아니라, 마술사가 지팡이를 휘두르면 허공에 완벽한 인형이 한 번에 나타나는 것과 같음</text:span><text:span/></text:p>
        </text:list-item>
      </text:list>
      <text:p text:style-name="P138"><text:span text:style-name="T492">📝 핵심 요약</text:span><text:span/></text:p>
      <text:list text:style-name="WWNum5" text:continue-numbering="true">
        <text:list-item>
          <text:p text:style-name="P139"><text:span text:style-name="T493">죽음이 완결되는 순간과 바르도가 시작되는 순간은 저울대의 오르내림처럼 완벽하게 동시적임.</text:span><text:span/></text:p>
        </text:list-item>
        <text:list-item>
          <text:p text:style-name="P140"><text:span text:style-name="T494">아비달마집론, 구사론, 유가사지론 등 수많은 가르침이 이 동시성을 공통으로 설함.</text:span><text:span/></text:p>
        </text:list-item>
        <text:list-item>
          <text:p text:style-name="P141"><text:span text:style-name="T495">바르도의 존재는 자궁 같은 매개체 없이 허공에 홀연히 출현하는 화생의 형태를 띰.</text:span><text:span/></text:p>
        </text:list-item>
        <text:list-item>
          <text:p text:style-name="P142"><text:span text:style-name="T496">화생의 특성상 점진적인 성장 과정을 거치지 않고 신체의 모든 기관과 지분이 일시에 완성됨.</text:span><text:span/></text:p>
        </text:list-item>
      </text:list>
      <text:p text:style-name="P143"><text:span text:style-name="T497"><text:soft-page-break/></text:span><text:span text:style-name="T498"/><text:span text:style-name="T499"/></text:p>
      <text:p text:style-name="P144"><text:span text:style-name="T500">[🟢 Online Mode | 26.06.05_11:56:47]</text:span><text:span/></text:p>
      <text:p text:style-name="P145"><text:span text:style-name="T501">75. 바르도 진입과 의식의 역행 단계</text:span><text:span/></text:p>
      <text:p text:style-name="P146"><text:span text:style-name="T502">🔑 핵심 키워드: 바르도, 의식의 역행, 80자성 분별심, 재생의 탐색, 향기 음식</text:span><text:span/></text:p>
      <text:p text:style-name="P147"><text:span text:style-name="T503">🔄 거꾸로 되돌아가는 의식의 필름</text:span><text:span/></text:p>
      <text:p text:style-name="P148"><text:span text:style-name="T504">몸을 벗어나 중간 상태인 바르도에 진입하는 그 순간, 신기하게도 의식은 방금 전까지 겪었던 소멸 과정과 완전히 정반대의 순서로 다시 깨어나기 시작해. 마치 전원을 껐던 컴퓨터를 다시 켜면 가장 나중에 닫혔던 핵심 시스템부터 거꾸로 부팅되며 화면이 들어오는 것과 똑같지. 가장 깊고 고요한 정광명의 상태에서 시작해, 잠들었던 의식이 서서히 수면 위로 깨어나는 역행의 첫걸음이야.</text:span><text:span/></text:p>
      <text:p text:style-name="P149"><text:span text:style-name="T505">🌅 안개 속에서 서서히 밝아지는 마음</text:span><text:span/></text:p>
      <text:p text:style-name="P150"><text:span text:style-name="T506">의식은 가장 먼저 정광명에 가까운 마음을 거쳐, 한층 밝은 마음, 그리고 밝은 마음의 단계를 차례대로 밟아가며 점점 겉표면으로 올라오게 돼. 이것은 어두운 지하 동굴에서 계단을 한 칸씩 걸어 올라올 때마다 바깥세상의 빛이 점점 강해지며 사물의 테두리가 또렷해지는 과정과 비슷해. 투명하게 비어 있던 내면의 우주 공간에 다시 에너지가 차오르는 신비로운 여정이지.</text:span><text:span/></text:p>
      <text:p text:style-name="P151"><text:span text:style-name="T507">🧠 다시 깨어나는 80가지 분별의 생각들</text:span><text:span/></text:p>
      <text:p text:style-name="P152"><text:span text:style-name="T508">빛의 단계들을 지나면 마침내 우리가 평소에 늘 사용하던 인간적인 마음, 즉 80가지 자성을 가진 분별의 마음들이 폭포수처럼 일시에 깨어나게 돼. 고요한 명상실에 앉아 있다가 갑자기 수많은 사람이 자기 주장을 펼치는 시끄러운 시장 한복판으로 순간 이동을 한 것과 같아. 좋고 싫음, 옳고 그름을 나누는 세속적인 생각의 프로그램들이 다시 풀가동되면서 바르도의 존재로서 본격적인 활동을 시작하는 거야.</text:span><text:span/></text:p>
      <text:p text:style-name="P153"><text:span text:style-name="T509">👃 새로운 몸과 향기를 찾아 떠나는 질주</text:span><text:span/></text:p>
      <text:p text:style-name="P154"><text:span text:style-name="T510">이렇게 분별심이 깨어난 바르도의 생명체는 한곳에 가만히 머물지 못하고, 자신이 새로 태어날 장소와 먹을거리를 찾아 사방으로 바쁘게 뛰어다니게 돼. 이때 이들의 유일한 양식은 다름 아닌 물질이 풍기는 미세한 향기야. 배고픈 여행자가 골목길에서 풍겨오는 음식 냄새에 이끌려 본능적으로 식당을 찾아 헤매듯, 새로운 삶의 둥지를 틀기 위해 거대한 에너지의 이끌림을 따라 쉴 새 없이 질주하는 단계란다.</text:span><text:span/></text:p>
      <text:p text:style-name="P155"><text:span text:style-name="T511">📝 핵심 요약</text:span><text:span/></text:p>
      <text:list text:style-name="WWNum7" text:continue-numbering="true">
        <text:list-item>
          <text:p text:style-name="P156"><text:span text:style-name="T512">바르도에 진입하는 순간 의식은 소멸할 때와 정반대의 순서로 다시 깨어난다.</text:span><text:span/></text:p>
        </text:list-item>
        <text:list-item>
          <text:p text:style-name="P157"><text:span text:style-name="T513">정광명에 가까운 마음에서 시작해 한층 밝은 마음과 밝은 마음의 단계를 차례로 거친다.</text:span><text:span/></text:p>
        </text:list-item>
        <text:list-item>
          <text:p text:style-name="P158"><text:span text:style-name="T514">이후 평소의 인간적 생각인 80가지 자성의 분별심들이 다시 활성화된다.</text:span><text:span/></text:p>
        </text:list-item>
        <text:list-item>
          <text:p text:style-name="P159"><text:span text:style-name="T515">의식이 깨어난 바르도 존재는 본능적으로 새로운 탄생처와 음식이 될 향기를 찾아 사방으로 치닫는다.</text:span><text:span/></text:p>
        </text:list-item>
      </text:list>
      <text:p text:style-name="P160"><text:span text:style-name="T516"><text:soft-page-break/></text:span><text:span text:style-name="T517"/><text:span text:style-name="T518"/></text:p>
      <text:p text:style-name="P161"><text:span text:style-name="T519">[🟢 Online Mode | 26.06.05_11:56:53]</text:span><text:span/></text:p>
      <text:p text:style-name="P162"><text:span text:style-name="T520">76. 거꾸로 흐르는 의식과 역순의 재출현</text:span><text:span/></text:p>
      <text:p text:style-name="P163"><text:span text:style-name="T521">🔑 핵심 키워드: 역순의 출현, 의식의 재구성, 정광명에서 아지랑이로</text:span><text:span/></text:p>
      <text:p text:style-name="P164"><text:span text:style-name="T522">🔄 거꾸로 재생되는 의식의 비디오</text:span><text:span/></text:p>
      <text:p text:style-name="P165"><text:span text:style-name="T523">죽음의 순간에 모든 기운이 안으로 숨어들며 녹아내렸다면, 새로운 존재로 깨어나는 순간에는 그 과정이 완전히 거꾸로 뒤집혀서 일어나게 돼. 영화를 끝까지 다 보고 나서 비디오테이프를 처음으로 되감을 때 모든 장면이 역순으로 빠르게 지나가는 것처럼 말이야. 앞서 경험했던 해체 과정이 반대로 진행되면서, 미세한 의식 상태에서부터 다시 거친 물질의 세계를 향해 차례대로 차원의 문이 열리는 신비로운 반전이 시작되는 거지.</text:span><text:span/></text:p>
      <text:p text:style-name="P166"><text:span text:style-name="T524">🌌 가장 깊은 어둠에서 시작되는 첫걸음</text:span><text:span/></text:p>
      <text:p text:style-name="P167"><text:span text:style-name="T525">의식의 재구성은 가장 깊고 미세한 영역인 흑색의 상태, 즉 정광명에 가장 가까운 마음인 근득 상태에서부터 첫걸음을 떼게 돼. 컴퓨터의 전원 버튼을 누르면 화면이 켜지기 전에 메인 제어 시스템이 가장 먼저 조용히 작동을 시작하는 것과 아주 비슷해. 겉으로 보기에는 아무것도 없는 깊은 심연의 암흑 같지만, 그 고요한 공간 내부에서부터 새로운 몸을 입기 위한 미세한 에너지가 서서히 꿈틀거리기 시작하는 거야.</text:span><text:span/></text:p>
      <text:p text:style-name="P168"><text:span text:style-name="T526">🌫️ 물질의 세계를 향해 피어오르는 아지랑이</text:span><text:span/></text:p>
      <text:p text:style-name="P169"><text:span text:style-name="T527">이 역순의 흐름은 점차 붉은빛과 하얀빛의 단계를 거쳐 마침내 물질적 쌓임의 징조인 아지랑이 현상에 이르게 돼. 가물가물한 겨울 아침에 차가운 땅 위로 아지랑이가 피어오르며 대지의 존재를 알리는 것처럼, 정신적인 영역에 머물던 의식이 다시 거친 물질과 감각의 세계로 돌아왔음을 보여주는 마지막 이정표지. 이 아지랑이 현상을 마주하면서 의식은 영적인 상태를 지나 우리가 체감할 수 있는 형태를 다시 갖추게 되는 거야.</text:span><text:span/></text:p>
      <text:p text:style-name="P170"><text:span text:style-name="T528">📝 핵심 요약</text:span><text:span/></text:p>
      <text:list text:style-name="WWNum8" text:continue-numbering="true">
        <text:list-item>
          <text:p text:style-name="P171"><text:span text:style-name="T529">역순의 재출현은 임종 때 일어났던 에너지 해체 과정이 완벽하게 거꾸로 진행되는 현상이다.</text:span><text:span/></text:p>
        </text:list-item>
        <text:list-item>
          <text:p text:style-name="P172"><text:span text:style-name="T530">정광명에 가장 가까운 미세한 의식인 흑색 상태에서부터 새로운 의식의 재구성이 시작된다.</text:span><text:span/></text:p>
        </text:list-item>
        <text:list-item>
          <text:p text:style-name="P173"><text:span text:style-name="T531">내면의 미세한 에너지들은 하얀빛과 붉은빛을 거쳐 거친 물질의 세계로 점차 나아간다.</text:span><text:span/></text:p>
        </text:list-item>
        <text:list-item>
          <text:p text:style-name="P174"><text:span text:style-name="T532">물질적 소멸의 마지막 징후였던 아지랑이 현상이 역순 과정에서는 물질 세계로 돌아오는 첫 신호가 된다.</text:span><text:span/></text:p>
        </text:list-item>
      </text:list>
      <text:p text:style-name="P175"><text:span text:style-name="T533"><text:soft-page-break/></text:span><text:span text:style-name="T534"/><text:span text:style-name="T535"/></text:p>
      <text:p text:style-name="P176"><text:span text:style-name="T536">[🟢 Online Mode | 26.06.05_11:56:59]</text:span><text:span/></text:p>
      <text:p text:style-name="P177"><text:span text:style-name="T537">77. 물질의 옷을 벗고 바람으로 태어나는 의생신의 바르도</text:span><text:span/></text:p>
      <text:p text:style-name="P178"><text:span text:style-name="T538">🔑 핵심 키워드: 거친 육신, 생명의 바람, 의생신, 기본의 보신, 심향</text:span><text:span/></text:p>
      <text:p text:style-name="P179"><text:span text:style-name="T539">👕 낡은 외투를 벗어던진 순수한 에너지 체</text:span><text:span/></text:p>
      <text:p text:style-name="P180"><text:span text:style-name="T540">피와 살처럼 무겁고 투박한 물질로 이루어진 거친 육신을 완전히 벗어던지는 단계야. 겨울 내내 몸을 무겁게 짓누르던 두꺼운 패딩 점퍼를 홀가분하게 벗어버리는 것과 같지. 이 상태의 존재는 더 이상 물리적인 제약에 갇히지 않고, 오직 미세한 생명의 바람과 오색 빛의 에너지만으로 이루어진 극도로 미세한 몸인 의생신을 입게 돼.</text:span><text:span/></text:p>
      <text:p text:style-name="P181"><text:span text:style-name="T541">🌬️ 생각하는 대로 움직이는 바람의 기동력</text:span><text:span/></text:p>
      <text:p text:style-name="P182"><text:span text:style-name="T542">이 의생신의 상태에서는 가로막는 벽이나 거대한 산이 있어도 아무런 방해를 받지 않고 자유자재로 통과할 수 있어. 마치 우리가 컴퓨터 게임 속에서 마우스 클릭 한 번으로 아바타를 원하는 곳으로 즉시 이동시키는 것처럼, 마음먹은 곳이라면 어디든 빛의 속도로 도달하는 엄청난 기동력을 가지게 되지. 물질의 무게감이 사라지고 순수한 정신적 바람의 힘으로만 존재하기 때문이야.</text:span><text:span/></text:p>
      <text:p text:style-name="P183"><text:span text:style-name="T543">💎 찬란한 결실을 품은 보신의 씨앗</text:span><text:span/></text:p>
      <text:p text:style-name="P184"><text:span text:style-name="T544">불교에서는 이 미세한 바르도의 몸을 가리켜 깨달음의 완전한 결실 중 하나인 기본의 보신이라고 불러. 지금은 비록 윤회 속을 떠도는 불안정한 상태이지만, 나중에 완벽하게 정화되면 찬란한 빛으로 중생을 구제하는 부처님의 보신으로 업그레이드될 잠재력을 고스란히 품고 있거든. 투박한 애벌레의 모습을 하고 있지만, 그 안에 눈부신 나비로 날아오를 유전적 지도를 이미 완벽하게 갖추고 있는 셈이지.</text:span><text:span/></text:p>
      <text:p text:style-name="P185"><text:span text:style-name="T545">🍲 향기로 허기를 채우는 신비로운 존재</text:span><text:span/></text:p>
      <text:p text:style-name="P186"><text:span text:style-name="T546">이 상태의 존재들은 우리가 먹는 거친 음식 대신 물질의 깊은 내면에서 피어오르는 향기를 맡으며 영양분을 섭취해. 그래서 향기를 찾는 존재라는 뜻으로 심향이라고도 부르지. 우리가 스마트폰을 전선에 꽂지 않고 무선 충전 패드 위에 올려두기만 해도 에너지가 스르륵 충전되는 것처럼, 눈에 보이지 않는 미세한 향의 기운을 흡수하며 자신의 존재를 유지해 나가는 독특한 생존 방식이야.</text:span><text:span/></text:p>
      <text:p text:style-name="P187"><text:span text:style-name="T547">📝 핵심 요약</text:span><text:span/></text:p>
      <text:list text:style-name="WWNum9" text:continue-numbering="true">
        <text:list-item>
          <text:p text:style-name="P188"><text:span text:style-name="T548">피와 살로 된 거친 육신을 벗고 오직 생명의 바람으로만 이루어진 의생신의 상태로 진입함.</text:span><text:span/></text:p>
        </text:list-item>
        <text:list-item>
          <text:p text:style-name="P189"><text:span text:style-name="T549">물질적 장애물의 방해를 받지 않으며 마음먹은 곳은 어디든 즉시 이동할 수 있는 기동력을 지님.</text:span><text:span/></text:p>
        </text:list-item>
        <text:list-item>
          <text:p text:style-name="P190"><text:span text:style-name="T550">비록 불안정한 바르도의 상태이지만 향후 부처님의 보신으로 정화될 완전한 잠재력을 품고 있음.</text:span><text:span/></text:p>
        </text:list-item>
        <text:list-item>
          <text:p text:style-name="P191"><text:span text:style-name="T551">거친 음식 대신 미세한 향기를 호흡하며 생명력을 유지하기에 심향이라는 이름으로도 불림.</text:span><text:span/></text:p>
        </text:list-item>
      </text:list>
      <text:p text:style-name="P192"><text:span text:style-name="T552"><text:soft-page-break/></text:span><text:span text:style-name="T553"/><text:span text:style-name="T554"/></text:p>
      <text:p text:style-name="P193"><text:span text:style-name="T555">78. 매일 밤 일어나는 죽음의 예행연습과 수면의 광명</text:span><text:span/></text:p>
      <text:p text:style-name="P194"><text:span text:style-name="T556">🔑 핵심 키워드: 바르도, 수면 단계, 사공, 수면의 광명</text:span><text:span/></text:p>
      <text:p text:style-name="P195"><text:span text:style-name="T557">😴 일상 속에서 발견하는 바르도의 증거</text:span><text:span/></text:p>
      <text:p text:style-name="P196"><text:span text:style-name="T558">바르도라는 미세한 중간 상태가 실제로 존재하는지 명확한 증거를 찾고 싶다면 우리가 매일 밤 경험하는 잠을 가만히 들여다보면 돼. 밀교에서는 우리가 깊은 잠에 빠져드는 매일의 일상이 사실은 죽음의 거대한 과정을 아주 짧게 축소해 놓은 최고의 예행연습이라고 말하거든. 매일 밤 침대에 누워 스르륵 의식을 잃어가는 순간마다 우리는 자신도 모르게 죽음의 과정을 미리 연습하고 있는 셈이야.</text:span><text:span/></text:p>
      <text:p text:style-name="P197"><text:span text:style-name="T559">💨 잠자리에서 스쳐 지나가는 네 가지 전조</text:span><text:span/></text:p>
      <text:p text:style-name="P198"><text:span text:style-name="T560">잠에 빠져들 때도 임종의 순간과 완전히 똑같이 아지랑이, 연기, 반딧불, 촛불의 떨림이라는 네 가지 미세한 현상이 순식간에 일어나. 비록 죽음의 순간처럼 육체가 완전히 무너지며 일어나는 변화가 아니라서 아주 스치듯 짧게 지나가기 때문에 평소에는 알아차리지 못할 뿐이지. 컴퓨터를 종료할 때 모니터 화면에 순식간에 여러 시스템 로그 기록이 스쳐 지나가며 꺼지는 것처럼 우리 의식의 회로도 아주 정교한 순서대로 잠의 세계로 진입하는 과정을 겪게 돼.</text:span><text:span/></text:p>
      <text:p text:style-name="P199"><text:span text:style-name="T561">🌌 공성의 단계와 은은한 수면의 빛</text:span><text:span/></text:p>
      <text:p text:style-name="P200"><text:span text:style-name="T562">이어서 마음의 깊은 본질을 보여주는 네 가지 공성인 공, 극공, 대공, 일체공의 단계가 아주 짧게 일어나고 마침내 수면의 광명이 마음속에 은은하게 나타나게 돼. 비록 진짜 죽음의 순간에 마주하는 정광명보다는 조금 더 거칠고 미세함이 덜하지만 본질적으로는 모든 잡념과 망상이 완전히 끊어진 청정한 상태를 마주하는 거야. 비유하자면 깜깜한 동굴 속으로 깊이 걸어 들어가다가 마지막 순간에 아주 은은한 손전등 빛 하나를 마주하는 신비로운 경험과 같아.</text:span><text:span/></text:p>
      <text:p text:style-name="P201"><text:span text:style-name="T563">🧘 깨달음의 훈련장으로 변하는 일상</text:span><text:span/></text:p>
      <text:p text:style-name="P202"><text:span text:style-name="T564">결국 밀교에서 바르도의 존재를 증명하기 위해 잠을 예로 드는 이유는 매일 밤 찾아오는 이 기회를 통해 죽음의 순간을 미리 통제하는 훈련을 할 수 있기 때문이야. 우리가 잠들고 깨는 일상적인 반복을 지혜로운 눈으로 관찰하기만 해도 바르도라는 미세한 의식 상태가 분명히 실재함을 확신할 수 있게 되지. 일상의 평범한 수면을 위대한 명상과 깨달음의 도구로 바꿀 수 있는 놀라운 비밀이 바로 이 짧은 수면의 차제 속에 숨겨져 있어.</text:span><text:span/></text:p>
      <text:p text:style-name="P203"><text:span text:style-name="T565">📝 핵심 요약</text:span><text:span/></text:p>
      <text:list text:style-name="WWNum10" text:continue-numbering="true">
        <text:list-item>
          <text:p text:style-name="P204"><text:span text:style-name="T566">잠에 드는 과정은 임종의 순간을 아주 짧게 축소해 놓은 완벽한 예행연습임</text:span><text:span/></text:p>
        </text:list-item>
        <text:list-item>
          <text:p text:style-name="P205"><text:span text:style-name="T567">수면 단계에서도 아지랑이, 연기, 반딧불, 촛불의 네 가지 현상이 스치듯 발생함</text:span><text:span/></text:p>
        </text:list-item>
        <text:list-item>
          <text:p text:style-name="P206"><text:span text:style-name="T568">네 가지 공성의 단계를 거쳐 임종의 정광명과 유사한 수면의 광명이 나타남</text:span><text:span/></text:p>
        </text:list-item>
        <text:list-item>
          <text:p text:style-name="P207"><text:span text:style-name="T569">매일 밤 겪는 수면 과정을 통해 바르도라는 미세한 의식 상태의 실재를 확신할 수 있음</text:span><text:span/></text:p>
        </text:list-item>
      </text:list>
      <text:p text:style-name="P208"><text:span text:style-name="T570"><text:soft-page-break/></text:span><text:span text:style-name="T571"/><text:span text:style-name="T572"/></text:p>
      <text:p text:style-name="P209"><text:span text:style-name="T573">79. 수면의 광명과 몽신의 탄생</text:span><text:span/></text:p>
      <text:p text:style-name="P210"><text:span text:style-name="T574">🔑 핵심 키워드: 수면의 광명, 몽신, 바르도 시뮬레이션, 꿈속의 활동</text:span><text:span/></text:p>
      <text:p text:style-name="P211"><text:span text:style-name="T575">💤 깊은 잠의 리셋과 새로운 아바타의 등장</text:span><text:span/></text:p>
      <text:p text:style-name="P212"><text:span text:style-name="T576">우리가 매일 밤 경험하는 깊은 잠의 광명 상태에서 깨어날 때, 우리의 의식은 곧바로 무거운 육체로 돌아오는 것이 아니라 꿈속의 몸인 몽신을 먼저 마주하게 돼. 이것은 마치 컴퓨터가 완전히 종료되었다가 다시 켜질 때, 곧바로 고사양 프로그램을 돌리는 것이 아니라 가벼운 부팅 시스템을 먼저 거치는 것과 비슷하지. 깊은 잠이라는 거대한 리셋 과정을 통과한 의식이 가상 현실 게임에 접속하기 위해 새로운 아바타를 생성하는 첫 번째 단계라고 볼 수 있어.</text:span><text:span/></text:p>
      <text:p text:style-name="P213"><text:span text:style-name="T577">🌌 차원이 다른 가상의 몸, 몽신의 성취</text:span><text:span/></text:p>
      <text:p text:style-name="P214"><text:span text:style-name="T578">의식이 잠에서 완전히 깨어나 몽신을 성취하게 되면, 우리는 물리적인 제약이 없는 아주 특별한 에너지의 몸을 얻게 돼. 무거운 외투를 벗어던지고 온몸이 깃털처럼 가벼워지는 것과 같은 상태지. 이 몽신은 시공간을 초월할 수 있는 미세한 마음의 에너지로 이루어져 있어서, 현실의 육체가 침대 위에 가만히 누워 있는 동안에도 아무런 방해를 받지 않고 자유롭게 존재할 수 있게 해주는 완벽한 통로가 되어주는 거야.</text:span><text:span/></text:p>
      <text:p text:style-name="P215"><text:span text:style-name="T579">🎭 꿈의 무대에서 벌어지는 다양한 액티비티</text:span><text:span/></text:p>
      <text:p text:style-name="P216"><text:span text:style-name="T580">이렇게 몽신이 완벽하게 이루어지고 나면, 우리는 꿈이라는 거대한 가상 세계의 무대 위에서 본격적으로 움직이기 시작해. 꿈속에서 하늘을 날아다니기도 하고, 그리운 사람을 만나 대화를 나누거나, 전혀 가보지 못한 낯선 공간을 탐험하는 등 갖가지 다채로운 활동들을 펼치게 되지. 비록 눈을 뜨면 사라질 가상의 세계처럼 보이지만, 그 순간만큼은 온전한 감각과 의식을 가지고 살아 움직이는 또 하나의 생생한 삶의 무대가 열리는 셈이야.</text:span><text:span/></text:p>
      <text:p text:style-name="P217"><text:span text:style-name="T581">🔄 죽음의 바르도를 연습하는 매일 밤의 시뮬레이션</text:span><text:span/></text:p>
      <text:p text:style-name="P218"><text:span text:style-name="T582">가장 놀라운 사실은 매일 밤 꿈속의 몸으로 일어나는 이 과정이, 훗날 죽음의 정광명에서 깨어나 바르도라는 중유의 몸을 받는 과정과 완벽하게 똑같다는 점이야. 우리는 매일 밤 잠을 자면서 자신도 모르는 사이에 죽음과 재탄생이라는 거대한 우주적 여정을 연습하는 최고의 비행 시뮬레이터를 타고 있는 격이지. 이 비밀스러운 연결고리를 이해한다면 잠들고 꿈꾸는 일상의 리듬이 얼마나 소중한 수행의 기회인지 깊이 깨달을 수 있어.</text:span><text:span/></text:p>
      <text:p text:style-name="P219"><text:span text:style-name="T583">📝 핵심 요약</text:span><text:span/></text:p>
      <text:list text:style-name="WWNum11" text:continue-numbering="true">
        <text:list-item>
          <text:p text:style-name="P220"><text:span text:style-name="T584">깊은 수면의 광명 상태에서 의식이 깨어날 때 꿈속의 몸인 몽신이 처음 발생한다.</text:span><text:span/></text:p>
        </text:list-item>
        <text:list-item>
          <text:p text:style-name="P221"><text:span text:style-name="T585">몽신이 온전하게 성취되면 물리적 육체의 한계를 벗어난 미세한 에너지의 몸을 얻는다.</text:span><text:span/></text:p>
        </text:list-item>
        <text:list-item>
          <text:p text:style-name="P222"><text:span text:style-name="T586">꿈속의 단계로 진입한 의식은 몽신을 통해 공간을 초월하는 갖가지 다양한 활동을 수행한다.</text:span><text:span/></text:p>
        </text:list-item>
        <text:list-item>
          <text:p text:style-name="P223"><text:span text:style-name="T587">매일 밤 수면에서 깨어나 꿈을 꾸는 일련의 과정은 죽음 이후 바르도의 몸을 받는 과정과 정확히 일치하는 시뮬레이션이다.</text:span><text:span/></text:p>
        </text:list-item>
      </text:list>
      <text:p text:style-name="P224"><text:span text:style-name="T588"><text:soft-page-break/></text:span><text:span text:style-name="T589"/><text:span text:style-name="T590"/></text:p>
      <text:p text:style-name="P225"><text:span text:style-name="T591">80. 꿈에서 깨어나 현실의 몸으로 돌아오는 거울의 마법</text:span><text:span/></text:p>
      <text:p text:style-name="P226"><text:span text:style-name="T592">🔑 핵심 키워드: 꿈의 바람 몸, 거울 위의 입김 비유, 아와두띠의 풍심, 각성과 활동</text:span><text:span/></text:p>
      <text:p text:style-name="P227"><text:span text:style-name="T593">🪞 거울 위 입김처럼 사라지는 꿈의 몸</text:span><text:span/></text:p>
      <text:p text:style-name="P228"><text:span text:style-name="T594">우리가 꿈속에서 자유롭게 날아다니고 활동할 때 쓰던 미세한 바람의 몸은, 잠에서 깨어나는 순간 아주 독특한 방식으로 자취를 감추게 돼. 차가운 유리창이나 거울에 후 하고 입김을 불었을 때, 가장자리부터 투명하게 부서지며 순식간에 가운데로 모여 흔적도 없이 사라지는 모습을 본 적 있지? 꿈속의 나를 구성하던 그 미세한 에너지들도 이와 똑같이 주변부부터 부드럽게 녹아내리며 심장을 향해 차분히 모여들기 시작해.</text:span><text:span/></text:p>
      <text:p text:style-name="P229"><text:span text:style-name="T595">🗺️ 심장의 중앙 도로로 모여드는 에너지</text:span><text:span/></text:p>
      <text:p text:style-name="P230"><text:span text:style-name="T596">사방에서 사그라든 꿈의 에너지는 마침내 우리가 잠들어 있는 현실 육체의 가장 깊은 중심점, 즉 심장 속의 아와두띠라는 중앙 통로로 한데 집결하게 돼. 대도시의 수많은 골목길을 비추던 가로등 불빛들이 새벽이 오면 일제히 꺼지면서 메인 발전소의 중심 전력망으로 에너지를 다시 회수하는 과정과 아주 비슷하지. 이 단계를 통해 사방으로 흩어져 있던 꿈속 의식의 파편들이 다시 하나의 강력한 중심으로 단단하게 뭉치게 되는 거야.</text:span><text:span/></text:p>
      <text:p text:style-name="P231"><text:span text:style-name="T597">⚡ 가장 미세한 본질로의 완벽한 도킹</text:span><text:span/></text:p>
      <text:p text:style-name="P232"><text:span text:style-name="T598">중앙 통로로 모여든 에너지는 결코 허무하게 사라지는 게 아니라, 그곳에 원래 자리 잡고 있던 가장 미세하고 본질적인 의식의 씨앗인 풍심 속으로 완전히 스며들어 통합돼. 스마트폰에서 화려하게 실행되던 여러 개의 게임이나 앱들을 종료하면, 그 앱들이 차지하던 메모리와 자원이 기기의 가장 핵심적인 메인 프로세서 내부로 깔끔하게 반환되는 것과 같은 이치지. 더 이상 쪼갤 수 없는 순수한 생명의 본질과 완벽하게 합일하는 순간이야.</text:span><text:span/></text:p>
      <text:p text:style-name="P233"><text:span text:style-name="T599">🎬 무대의 불이 켜지고 시작되는 일상</text:span><text:span/></text:p>
      <text:p text:style-name="P234"><text:span text:style-name="T600">본질의 에너지와 합일이 완료되면 비로소 우리의 감각 체계에 불이 들어오면서 길었던 수면의 세계가 막을 내리게 돼. 막이 내린 어두운 무대 뒤에서 대기하던 배우들이 메인 조명이 켜지자마자 일제히 무대 위로 뛰어올라 활기차게 각자의 역할을 수행하는 것처럼, 우리도 눈을 뜨자마자 말하고, 움직이고, 생각하는 갖가지 현실의 활동들을 시작하게 되지. 밤새 미세한 차원을 넘나들던 영혼이 현실이라는 메인 무대로 매끄럽게 복귀하는 멋진 과정인 셈이야.</text:span><text:span/></text:p>
      <text:p text:style-name="P235"><text:span text:style-name="T601">📝 핵심 요약</text:span><text:span/></text:p>
      <text:list text:style-name="WWNum12" text:continue-numbering="true">
        <text:list-item>
          <text:p text:style-name="P236"><text:span text:style-name="T602">잠에서 깨어날 때 꿈속의 미세한 바람의 몸은 거울 위의 입김처럼 가장자리부터 심장으로 모여들며 사라짐.</text:span><text:span/></text:p>
        </text:list-item>
        <text:list-item>
          <text:p text:style-name="P237"><text:span text:style-name="T603">모여든 에너지는 잠들어 있던 육체의 심장 중심 통로인 아와두띠 안으로 일제히 집결함.</text:span><text:span/></text:p>
        </text:list-item>
        <text:list-item>
          <text:p text:style-name="P238"><text:span text:style-name="T604">이 에너지는 아와두띠 내부에 존재하는 가장 미세한 의식의 본질인 풍심 속으로 완전히 은멸함.</text:span><text:span/></text:p>
        </text:list-item>
        <text:list-item>
          <text:p text:style-name="P239"><text:span text:style-name="T605">본질과의 합일을 바탕으로 감각이 다시 깨어나며 현실 세계의 갖가지 일상 활동들을 시작하게 됨.</text:span><text:span/></text:p>
        </text:list-item>
      </text:list>
      <text:p text:style-name="P240"><text:span text:style-name="T606"><text:soft-page-break/></text:span><text:span text:style-name="T607"/><text:span text:style-name="T608"/></text:p>
      <text:p text:style-name="P241"><text:span text:style-name="T609">[🟢 Online Mode | 26.06.05_15:07:41]</text:span><text:span/></text:p>
      <text:p text:style-name="P242"><text:span text:style-name="T610">81. 바르도 존재가 지닌 다섯 가지 신비로운 신체 특성</text:span><text:span/></text:p>
      <text:p text:style-name="P243"><text:span text:style-name="T611">🔑 핵심 키워드: 바르도의 특성, 화생의 신체, 금강석의 불괴성, 공간 초월, 업력의 신통</text:span><text:span/></text:p>
      <text:p text:style-name="P244"><text:span text:style-name="T612">👶 결함 없이 한순간에 태어나는 완벽한 몸</text:span><text:span/></text:p>
      <text:p text:style-name="P245"><text:span text:style-name="T613">바르도 상태에 진입한 존재는 어머니의 배 속에서 점진적으로 자라는 과정 없이 모든 감각기관과 온몸의 크고 작은 지체들을 단숨에 완벽하게 갖추게 돼. 이것은 마치 부품을 하나하나 조립하는 게 아니라, 설계도대로 완벽한 완성품을 한 번에 찍어내는 최첨단 프린터의 결과물과 비슷하지. 어떠한 신체적 결함이나 장애도 없이 처음부터 가장 완전한 형태의 감각과 형태를 지니고 태어나는 신비로운 화생의 몸이야.</text:span><text:span/></text:p>
      <text:p text:style-name="P246"><text:span text:style-name="T614">💎 금강석도 부술 수 없는 극도로 미세한 방어력</text:span><text:span/></text:p>
      <text:p text:style-name="P247"><text:span text:style-name="T615">이 몸은 우리가 만질 수 있는 거친 물질이 아니라 극도로 미세한 에너지만으로 이루어져 있어. 그래서 세상에서 가장 단단하다고 알려진 다이아몬드나 강력한 무기로 내리쳐도 절대로 상처를 입거나 파괴되지 않지. 마치 허공을 향해 예리한 칼을 휘두르면 칼날이 아무리 날카로워도 허공을 벨 수 없는 것처럼, 어떠한 물리적인 타격이나 외부의 공격에도 완벽하게 안전한 절대적인 방어력을 지니고 있어.</text:span><text:span/></text:p>
      <text:p text:style-name="P248"><text:span text:style-name="T616">⛰️ 벽과 산을 그대로 통과하는 홀로그램 같은 이동력</text:span><text:span/></text:p>
      <text:p text:style-name="P249"><text:span text:style-name="T617">또한 바르도의 몸은 거대한 수미산이나 단단한 벽, 철망 같은 물질적 장애물에 전혀 걸리지 않고 그대로 통과할 수 있어. 마치 빛이 투명한 유리를 스쳐 지나가거나, 홀로그램 영상이 단단한 벽을 아무런 저항 없이 관통하는 것과 똑같은 이치야. 다만 자신이 다음 생을 받기 위해 들어가야 할 어머니의 자궁과 같은 특정한 출생 예정지만큼은 마음대로 통과할 수 없도록 강한 차단벽처럼 작용하게 되지.</text:span><text:span/></text:p>
      <text:p text:style-name="P250"><text:span text:style-name="T618">🚀 부처님도 막을 수 없는 강력한 업력의 순간이동</text:span><text:span/></text:p>
      <text:p text:style-name="P251"><text:span text:style-name="T619">마지막으로 바르도 존재는 전생에 지은 업력의 힘으로 가동되는 엄청난 신통력을 지니고 있어. 마음으로 생각하는 즉시 우주의 그 어떤 곳이든 공간을 접어 가듯 한순간에 이동할 수 있는 초고속 순간이동 능력이지. 이 에너지는 우주의 물리 법칙을 뛰어넘는 절대적인 엔진과 같아서, 중생의 자유의지와 업의 흐름을 그대로 존중하시는 부처님들조차 이 거침없는 이동을 강제로 제지하거나 붙잡아둘 수 없을 정도야.</text:span><text:span/></text:p>
      <text:p text:style-name="P252"><text:span text:style-name="T620">📝 핵심 요약</text:span><text:span/></text:p>
      <text:list text:style-name="WWNum13" text:continue-numbering="true">
        <text:list-item>
          <text:p text:style-name="P253"><text:span text:style-name="T621">바르도 존재는 점진적 성장 없이 완벽한 감각과 신체를 일시에 갖추고 태어남.</text:span><text:span/></text:p>
        </text:list-item>
        <text:list-item>
          <text:p text:style-name="P254"><text:span text:style-name="T622">극도로 미세한 에너지 형태라 세상의 어떤 단단한 물질로도 파괴할 수 없음.</text:span><text:span/></text:p>
        </text:list-item>
        <text:list-item>
          <text:p text:style-name="P255"><text:span text:style-name="T623">다음 생을 받을 자궁을 제외한 수미산이나 벽 등 모든 물질적 장애물을 걸림 없이 통과함.</text:span><text:span/></text:p>
        </text:list-item>
        <text:list-item>
          <text:p text:style-name="P256"><text:span text:style-name="T624">업력에서 비롯된 신통으로 원하는 곳에 순식간에 도달하며 부처님도 이를 제지하지 못함.</text:span><text:span/></text:p>
        </text:list-item>
      </text:list>
      <text:p text:style-name="P257"><text:span text:style-name="T625"><text:soft-page-break/></text:span><text:span text:style-name="T626"/><text:span text:style-name="T627"/></text:p>
      <text:p text:style-name="P258"><text:span text:style-name="T628">82. 바르도 상태의 유연성과 깨달음의 가능성</text:span><text:span/></text:p>
      <text:p text:style-name="P259"><text:span text:style-name="T629">🔑 핵심 키워드: 구사론, 아비달마집론, 바르도, 중반열반, 아라한, 생유</text:span><text:span/></text:p>
      <text:p text:style-name="P260"><text:span text:style-name="T630">🗺️ 목적지가 아직 정해지지 않은 환승 라운지</text:span><text:span/></text:p>
      <text:p text:style-name="P261"><text:span text:style-name="T631">죽음 이후에 다음 몸을 받기 전까지 머무는 바르도 상태는 마치 어떤 비행기로 갈아탈지 고민하는 거대한 국제공항의 환승 라운지와 같아. 이곳은 이미 모든 운명이 완벽하게 결정되어 굳어진 딱딱한 공간이 아니라, 앞으로 어디로 갈지 다양한 가능성이 열려 있는 유연한 공간이지. 우리가 인생의 기로에서 어떤 선택을 하느냐에 따라 미래가 바뀌듯, 이 중간 세계에서도 다음 여정을 향한 움직임은 생각보다 다채롭게 흘러갈 수 있어.</text:span><text:span/></text:p>
      <text:p text:style-name="P262"><text:span text:style-name="T632">🔄 여정을 바꿀 수 있는 마지막 기회</text:span><text:span/></text:p>
      <text:p text:style-name="P263"><text:span text:style-name="T633">이 중간 기차역에서 다음 목적지를 바꿀 수 있는지에 대해서는 여러 흥미로운 의견들이 있어. 어떤 이들은 한 번 특정 세계로 가는 티켓을 끊고 바르도에 진입하면 그 목적지를 절대 바꿀 수 없다고 말하기도 해. 하지만 다른 이들은 바르도 상태에 있더라도 마음에 따라 얼마든지 다른 세계로 향하는 노선으로 갈아탈 수 있는 기회가 남아있다고 설명하지. 결국 중요한 것은 이 상태가 고정불변의 공간이 아니라 변화의 여지가 존재하는 역동적인 영역이라는 점이야.</text:span><text:span/></text:p>
      <text:p text:style-name="P264"><text:span text:style-name="T634">👑 환승역에서 맞이하는 특별한 자유</text:span><text:span/></text:p>
      <text:p text:style-name="P265"><text:span text:style-name="T635">가장 놀라운 사실은 이 환승 라운지에서 다음 비행기를 타지 않고, 그 자리에서 곧바로 완벽한 자유를 얻어 영원히 정착할 수도 있다는 점이야. 이를 바르도 상태에서 곧바로 최고의 깨달음인 아라한의 경지를 이루는 중반열반이라고 불러. 다음 세상으로 가기 위해 무조건 새로운 몸을 받아 태어나야만 하는 규칙을 완전히 깨부수고, 중간 지대에서 곧바로 윤회의 사슬을 끊어버리는 엄청난 치트키 같은 순간이지.</text:span><text:span/></text:p>
      <text:p text:style-name="P266"><text:span text:style-name="T636">🚪 자동 인형이 아닌 자유로운 여정</text:span><text:span/></text:p>
      <text:p text:style-name="P267"><text:span text:style-name="T637">그러므로 우리는 죽음 이후의 세계를 거부할 수 없는 거대한 컨베이어 벨트에 실려 가는 것처럼 두려워할 필요가 전혀 없어. 다음 세상에 태어나는 일이 무조건 정해진 절대적인 의무가 아니라는 사실을 알게 되면 마음이 한결 가벼워지지. 바르도는 단순히 다음 단계로 넘어가기 위한 통로를 넘어, 수행의 힘에 따라 번뇌를 소멸하고 영원한 평화를 얻을 수 있는 최고의 기회의 장이 되어주기 때문이야.</text:span><text:span/></text:p>
      <text:p text:style-name="P268"><text:span text:style-name="T638">📝 핵심 요약</text:span><text:span/></text:p>
      <text:list text:style-name="WWNum14" text:continue-numbering="true">
        <text:list-item>
          <text:p text:style-name="P269"><text:span text:style-name="T639">바르도는 다음 생을 받기 전 머무는 공간으로, 다양한 가능성이 열려 있는 환승 라운지와 같다.</text:span><text:span/></text:p>
        </text:list-item>
        <text:list-item>
          <text:p text:style-name="P270"><text:span text:style-name="T640">바르도 상태에서 목적지를 바꿀 수 있는지에 대해서는 유연하게 대처할 수 있다는 견해가 존재한다.</text:span><text:span/></text:p>
        </text:list-item>
        <text:list-item>
          <text:p text:style-name="P271"><text:span text:style-name="T641">다음 생으로 나아가지 않고 바르도에서 즉시 아라한의 깨달음을 얻는 중반열반이 가능하다.</text:span><text:span/></text:p>
        </text:list-item>
        <text:list-item>
          <text:p text:style-name="P272"><text:span text:style-name="T642">모든 존재가 바르도에서 반드시 다시 태어나는 것은 아니며, 윤회를 끊을 기회가 주어진다.</text:span><text:span/></text:p>
        </text:list-item>
      </text:list>
      <text:p text:style-name="P273"><text:span text:style-name="T643"><text:soft-page-break/></text:span><text:span text:style-name="T644"/><text:span text:style-name="T645"/></text:p>
      <text:p text:style-name="P274"><text:span text:style-name="T646">83. 바르도를 부르는 다섯 가지 또 다른 이름</text:span><text:span/></text:p>
      <text:p text:style-name="P275"><text:span text:style-name="T647">🔑 핵심 키워드: 의생, 투생, 식향, 중유, 현성유</text:span><text:span/></text:p>
      <text:p text:style-name="P276"><text:span text:style-name="T648">🧠 의생과 중유, 마음으로 태어나 머무는 존재</text:span><text:span/></text:p>
      <text:p text:style-name="P277"><text:span text:style-name="T649">바르도는 우리가 다음 생을 받기 전까지 잠시 머무는 중간 세계를 뜻하는데, 구사론에서는 이를 다섯 가지 특별한 이름으로 설명하고 있어. 가장 먼저 중유는 말 그대로 죽음과 새로운 탄생 사이의 경계에 있는 존재를 뜻해. 그리고 이때의 존재를 의생이라고도 부르는데, 이는 부모의 육체적 결합이 아니라 오직 자신의 마음과 의지만으로 순식간에 태어나는 존재이기 때문이야. 마치 우리가 머릿속으로 상상하는 즉시 마음의 아바타가 눈앞에 나타나는 것처럼, 물질적인 제약 </text:span><text:span text:style-name="T650">없이 오직 의식의 힘만으로 형상을 이루는 신비로운 상태를 말하는 거란다.</text:span><text:span/></text:p>
      <text:p text:style-name="P278"><text:span text:style-name="T651">🎯 투생, 새로운 탄생의 자리를 찾아가는 이끌림</text:span><text:span/></text:p>
      <text:p text:style-name="P279"><text:span text:style-name="T652">두 번째 이름인 투생은 스스로 새로운 탄생의 자리를 향해 온몸을 던진다는 뜻을 담고 있어. 바르도에 머무는 존재는 마냥 가만히 있는 것이 아니라, 자신이 장차 태어날 어머니의 모태나 탄생 장소를 향해 강력한 에너지를 느끼며 자석에 이끌리듯 나아가게 되거든. 이는 마치 컴컴한 밤하늘을 날아가던 불나방이 저 멀리 반짝이는 따스한 불빛을 발견하고 거침없이 그곳을 향해 날아드는 모습과 아주 비슷해. 자신의 업력과 인연에 따라 다음 생의 보금자리를 향해 스스로를 </text:span><text:span text:style-name="T653">강하게 밀어 넣는 역동적인 움직임을 표현한 이름이지.</text:span><text:span/></text:p>
      <text:p text:style-name="P280"><text:span text:style-name="T654">🌹 식향, 은은한 향기로 생명을 유지하는 영혼</text:span><text:span/></text:p>
      <text:p text:style-name="P281"><text:span text:style-name="T655">세 번째 이름은 정말 흥미로운데, 바로 향기를 음식으로 삼아 먹는다는 뜻의 식향이야. 바르도의 존재는 우리가 먹는 밥이나 고기 같은 거칠고 단단한 물질적 음식을 전혀 먹을 수 없어. 대신 주위에 피어나는 은은하고 미세한 향기만을 호흡하듯 들이마시며 자신들의 생명 에너지를 유지한단다. 우리가 기분이 울적할 때 좋아하는 아로마 향을 맡으면 온몸에 순식간에 맑은 에너지가 돌며 힘이 나는 것처럼, 이들은 오직 향기라는 가장 순수하고 가벼운 영양분만을 섭취하며 다</text:span><text:span text:style-name="T656">음 생을 기다리는 맑은 상태로 존재하는 거야.</text:span><text:span/></text:p>
      <text:p text:style-name="P282"><text:span text:style-name="T657">🔮 현성유, 반드시 실현되는 생명의 법칙</text:span><text:span/></text:p>
      <text:p text:style-name="P283"><text:span text:style-name="T658">마지막 다섯 번째 이름인 현성유는 어떤 세계의 생명체로든 반드시 구체적인 모습을 실현해 내고야 마는 존재라는 의미를 지니고 있어. 바르도 상태는 영원히 머무는 곳이 아니라, 결국 육도윤회의 세계 중 자신이 가야 할 곳으로 반드시 몸을 바꾸어 나타나게 되는 결정된 흐름 속에 있음을 보여주는 이름이지. 건축가가 정교하게 그려둔 설계도를 바탕으로 마침내 단단한 실제 건물을 완성해 내는 것처럼, 마음속에 품은 업의 씨앗을 바탕으로 기필코 새로운 생명체라는 온전한</text:span><text:span text:style-name="T659"> 현실을 만들어내는 생명의 법칙을 뜻한단다.</text:span><text:span/></text:p>
      <text:p text:style-name="P284"><text:span text:style-name="T660">📝 핵심 요약</text:span><text:span/></text:p>
      <text:list text:style-name="WWNum15" text:continue-numbering="true">
        <text:list-item>
          <text:p text:style-name="P285"><text:span text:style-name="T661">중유는 죽음과 탄생 사이의 중간 존재를 뜻하며, 의생은 육체적 매개 없이 오직 마음의 힘만으로 태어남을 의미한다.</text:span><text:span/></text:p>
        </text:list-item>
        <text:list-item>
          <text:p text:style-name="P286"><text:span text:style-name="T662">투생은 다음 생을 보낼 모태나 탄생 장소를 향해 자석처럼 스스로 몸을 던져 나아가는 역동적인 이끌림이다.</text:span><text:span/></text:p>
        </text:list-item>
        <text:list-item>
          <text:p text:style-name="P287"><text:span text:style-name="T663">식향은 거친 물질 음식 대신 오직 은은하고 미세한 향기만을 호흡하듯 섭취하며 생명 에너지를 유지하는 상태를 말한다.</text:span><text:span/></text:p>
        </text:list-item>
        <text:list-item>
          <text:p text:style-name="P288"><text:span text:style-name="T664">현성유는 자신이 지은 업의 설계도에 따라 육도세계의 생명체 중 하나로 반드시 구체적인 현실을 실현해 냄을 뜻한다.</text:span><text:span/></text:p>
        </text:list-item>
      </text:list>
      <text:p text:style-name="P289"><text:span text:style-name="T665"><text:soft-page-break/></text:span><text:span text:style-name="T666"/><text:span text:style-name="T667"/></text:p>
      <text:p text:style-name="P290"><text:span text:style-name="T668">[🟢 Online Mode | 26.06.05_15:08:04]</text:span><text:span/></text:p>
      <text:p text:style-name="P291"><text:span text:style-name="T669">84. 바르도의 수명 주기와 49일의 최종 여정</text:span><text:span/></text:p>
      <text:p text:style-name="P292"><text:span text:style-name="T670">🔑 핵심 키워드: 바르도 수명, 작은 죽음, 탄생 조건, 49일 유전, 유가사지론</text:span><text:span/></text:p>
      <text:p text:style-name="P293"><text:span text:style-name="T671">⏳ 정해지지 않은 대기 시간과 7일의 기본 주기</text:span><text:span/></text:p>
      <text:p text:style-name="P294"><text:span text:style-name="T672">바르도라는 중간 존재로 머무는 시간은 기본적으로 최대 7일이라는 짧은 주기를 가지고 있어. 이 상태는 마치 공항의 환승 라운지에서 다음 비행기를 기다리는 일시적인 체류와 같단다. 하지만 이 대기 시간이 모든 존재에게 똑같이 자로 잰 듯 적용되는 것은 아니야. 다음 생으로 가기 위한 인연과 조건이 얼마나 빨리 갖춰지느냐에 따라 머무는 기간이 완전히 달라지기 때문에 딱 잘라 말할 수 없는 유동적인 시간이지.</text:span><text:span/></text:p>
      <text:p text:style-name="P295"><text:span text:style-name="T673">⚡ 인연의 결합과 즉각적인 재탄생</text:span><text:span/></text:p>
      <text:p text:style-name="P296"><text:span text:style-name="T674">만약 바르도에 진입하자마자 다음 생을 받을 수 있는 부모의 인연이나 환경 같은 탄생의 조건들이 완벽하게 맞춰진다면, 7일을 채우지 않고 곧바로 새로운 모태로 들어가 재탄생하게 돼. 공항 라운지에 앉자마자 대기 명단에 있던 내 이름이 불려 예약된 비행기에 바로 탑승하는 상황과 비슷해. 중간 지대에 오래 머물 필요 없이 의식이 다음 삶의 궤도로 순식간에 이동하는 유연한 흐름인 셈이지.</text:span><text:span/></text:p>
      <text:p text:style-name="P297"><text:span text:style-name="T675">🔄 작은 죽음을 통한 바르도 몸의 재생</text:span><text:span/></text:p>
      <text:p text:style-name="P298"><text:span text:style-name="T676">반대로 7일 동안 다음 생을 시작할 조건이 만들어지지 않으면, 바르도의 존재는 7일째 되는 마지막 순간에 작은 죽음이라는 독특한 에너지 재부팅을 겪게 돼. 스마트폰이 오랫동안 켜져 있으면 시스템을 한 번 껐다 켜야 다시 원활하게 작동하듯, 의식이 아주 미세한 죽음의 과정을 통과하며 동일한 바르도의 몸을 새롭게 부여받아 대기를 이어가는 거야. 일주일 단위로 계약을 갱신하며 환승 라운지에 더 머무는 것과 같은 이치란다.</text:span><text:span/></text:p>
      <text:p text:style-name="P299"><text:span text:style-name="T677">🎯 49일의 절대적 한계와 필연적 삶의 시작</text:span><text:span/></text:p>
      <text:p text:style-name="P300"><text:span text:style-name="T678">이러한 일주일 단위의 갱신과 작은 죽음의 반복은 무한정 지속되지 않고 최대 일곱 번, 즉 49일이라는 절대적인 한계를 가져. 유가사지론의 가르침에 따르면, 49일이 지나면 우주의 거대한 섭리에 의해 다음 생을 시작할 인연이 반드시 결합하여 무조건 새로운 몸을 받고 태어날 수밖에 없어. 환승 비행기의 최종 마감 시간이 되어 비자를 가진 이가 반드시 목적지행 비행기에 타야만 하는 필연적인 규칙인 거지.</text:span><text:span/></text:p>
      <text:p text:style-name="P301"><text:span text:style-name="T679">📝 핵심 요약</text:span><text:span/></text:p>
      <text:list text:style-name="WWNum16" text:continue-numbering="true">
        <text:list-item>
          <text:p text:style-name="P302"><text:span text:style-name="T680">바르도의 기본 수명은 최대 7일이지만 다음 생의 조건에 따라 즉시 몸을 받기도 해서 정해진 것은 없어.</text:span><text:span/></text:p>
        </text:list-item>
        <text:list-item>
          <text:p text:style-name="P303"><text:span text:style-name="T681">7일 동안 다음 생의 인연이 없으면 작은 죽음이라는 재부팅을 거쳐 바르도의 몸을 다시 얻어 대기해.</text:span><text:span/></text:p>
        </text:list-item>
        <text:list-item>
          <text:p text:style-name="P304"><text:span text:style-name="T682">이러한 주기는 최대 7주인 49일까지만 지속되며 이 기간이 지나면 반드시 탄생의 조건을 갖추게 돼.</text:span><text:span/></text:p>
        </text:list-item>
        <text:list-item>
          <text:p text:style-name="P305"><text:span text:style-name="T683">유가사지론의 설명처럼 49일은 의식이 새로운 물질적 삶으로 반드시 이행해야 하는 절대적인 한계 시간이야.</text:span><text:span/></text:p>
        </text:list-item>
      </text:list>
      <text:p text:style-name="P306"><text:span text:style-name="T684"><text:soft-page-break/></text:span><text:span text:style-name="T685"/><text:span text:style-name="T686"/></text:p>
      <text:p text:style-name="P307"><text:span text:style-name="T687">[🟢 Online Mode | 26.06.05_15:08:11]</text:span><text:span/></text:p>
      <text:p text:style-name="P308"><text:span text:style-name="T688">85. 7일마다 찾아오는 소멸과 재생의 순환</text:span><text:span/></text:p>
      <text:p text:style-name="P309"><text:span text:style-name="T689">🔑 핵심 키워드: 7일의 작은 죽음, 거울 위의 입김, 80자성 분별 은멸, 정광명 발생, 의생신 재성취</text:span><text:span/></text:p>
      <text:p text:style-name="P310"><text:span text:style-name="T690">🪞 거울 위의 입김처럼 사라지는 에너지</text:span><text:span/></text:p>
      <text:p text:style-name="P311"><text:span text:style-name="T691">바르도의 존재는 7일마다 한 번씩 작은 죽음이라는 독특한 에너지 재조정 과정을 겪게 돼. 이때 바르도의 몸을 이루는 바람의 에너지가 몸의 위아래 끝단에서부터 중심인 심장을 향해 서서히 모여들기 시작하지. 비유하자면 차가운 유리거울에 하 하고 입김을 불었을 때, 가장자리부터 투명하게 물기가 마르면서 점차 가운데로 수렴해 사라지는 모습과 완벽하게 똑같아. 외곽의 에너지가 중심핵으로 질서정연하게 수축하는 현상이야.</text:span><text:span/></text:p>
      <text:p text:style-name="P312"><text:span text:style-name="T692">🌬️ 80가지 잡념의 소멸과 번개 같은 빛</text:span><text:span/></text:p>
      <text:p text:style-name="P313"><text:span text:style-name="T693">심장으로 에너지가 모여들면, 바르도 상태를 유지하던 80가지 자성 분별의 마음과 이를 움직이던 미세한 바람들이 한꺼번에 사라지게 돼. 이어서 임종 때 겪었던 네 가지 현상과 사공의 단계가 아주 짧은 순간에 번개처럼 스쳐 지나가지.</text:span><text:span/></text:p>
      <text:list text:style-name="WWNum17" text:continue-numbering="true">
        <text:list-item>
          <text:p text:style-name="P314"><text:span text:style-name="T694">변화 순서: 분별심 은멸 후 사공의 순간적 발현을 거쳐 정광명 도달</text:span><text:span/></text:p>
        </text:list-item>
        <text:list-item>
          <text:p text:style-name="P315"><text:span text:style-name="T695">체감 속도: 단지 존재한다는 느낌만 들 정도로 지극히 짧고 강력함</text:span><text:span/></text:p>
        </text:list-item>
      </text:list>
      <text:p text:style-name="P316"><text:span text:style-name="T696">이 과정은 마치 컴퓨터가 과부하를 해결하기 위해 일시적으로 시스템을 완전히 종료했다가 재부팅하는 찰나의 공백 상태와 유사하다고 볼 수 있어.</text:span><text:span/></text:p>
      <text:p text:style-name="P317"><text:span text:style-name="T697">🌀 거꾸로 흐르는 태엽과 새로운 몸의 탄생</text:span><text:span/></text:p>
      <text:p text:style-name="P318"><text:span text:style-name="T698">궁극의 빛을 마주한 직후에는 에너지가 다시 역순으로 움직이기 시작해. 죽음의 정광명을 실어 나르던 가장 미세한 생명의 바람이 원동력이 되어, 이번에는 해체의 과정이 아니라 반대로 의식이 깨어나는 과정을 밟는 거지.</text:span><text:span/></text:p>
      <table:table table:style-name="ta3">
        <table:table-columns>
          <table:table-column table:style-name="co6"/>
          <table:table-column table:style-name="co7"/>
        </table:table-columns>
        <table:table-row table:style-name="ro9" table:default-cell-style-name="ce23">
          <table:table-cell table:style-name="ce24">
            <text:p text:style-name="P319"><text:span text:style-name="T699">단계</text:span><text:span/></text:p>
          </table:table-cell>
          <table:table-cell table:style-name="ce25">
            <text:p text:style-name="P320"><text:span text:style-name="T700">에너지의 이동과 의식의 변화</text:span><text:span/></text:p>
          </table:table-cell>
        </table:table-row>
        <table:table-row table:style-name="ro10" table:default-cell-style-name="ce23">
          <table:table-cell table:style-name="ce26">
            <text:p text:style-name="P321"><text:span text:style-name="T701">직접적 원인</text:span><text:span/></text:p>
          </table:table-cell>
          <table:table-cell table:style-name="ce27">
            <text:p text:style-name="P322"><text:span text:style-name="T702">정광명을 운반하던 극도로 미세한 생명의 바람이 작동함</text:span><text:span/></text:p>
          </table:table-cell>
        </table:table-row>
        <table:table-row table:style-name="ro11" table:default-cell-style-name="ce23">
          <table:table-cell table:style-name="ce28">
            <text:p text:style-name="P323"><text:span text:style-name="T703">역순의 진행</text:span><text:span/></text:p>
          </table:table-cell>
          <table:table-cell table:style-name="ce29">
            <text:p text:style-name="P324"><text:span text:style-name="T704">해체되었던 마음의 단계들이 반대 방향으로 차례로 깨어남</text:span><text:span/></text:p>
          </table:table-cell>
        </table:table-row>
        <table:table-row table:style-name="ro12" table:default-cell-style-name="ce23">
          <table:table-cell table:style-name="ce30">
            <text:p text:style-name="P325"><text:span text:style-name="T705">최종적 성취</text:span><text:span/></text:p>
          </table:table-cell>
          <table:table-cell table:style-name="ce31">
            <text:p text:style-name="P326"><text:span text:style-name="T706">예전과 완벽하게 동일한 형태의 바르도 의생신을 재성취함</text:span><text:span/></text:p>
          </table:table-cell>
        </table:table-row>
      </table:table>
      <text:p text:style-name="P327"><text:span text:style-name="T707">비유하자면 꽉 감겨 있던 태엽이 반대 방향으로 풀려나가며 멈췄던 시계 바늘을 다시 세차게 움직이게 만드는 것과 같아. 이 역순의 흐름 속에서 마음이 깨어남과 동시에 바르도의 몸이 눈 깜짝할 사이에 다시 완성되는 거야.</text:span><text:span/></text:p>
      <text:p text:style-name="P328"><text:span text:style-name="T708">🔄 끊임없이 반복되는 영혼의 탈바꿈</text:span><text:span/></text:p>
      <text:p text:style-name="P329"><text:span text:style-name="T709">이 7일 주기의 작은 죽음은 바르도 세계에 머무는 동안 존재가 겪는 일종의 탈바꿈이자 에너지 청소 과정이야. 아무리 여러 번 작은 죽음을 반복하더라도 이것은 완전히 다른 생으로 넘어가는 진짜 죽음이 아니라, 바르도라는 특수한 환경 안에서 일어나는 주기적인 현상일 뿐이지. 스마트폰의 배터리를 정기적으로 완전히 방전시켰다가 다시 백 퍼센트로 충전하여 시스템의 성능을 최적화하는 정기 점검 시간이라고 이해하면 아주 쉬워.</text:span><text:span/></text:p>
      <text:p text:style-name="P330"><text:span text:style-name="T710">📝 핵심 요약</text:span><text:span/></text:p>
      <text:list text:style-name="WWNum17" text:continue-numbering="true">
        <text:list-item>
          <text:p text:style-name="P331"><text:span text:style-name="T711">바르도 유정은 7일마다 거울의 입김이 마르듯 에너지를 심장으로 모으는 작은 죽음을 겪음.</text:span><text:span/></text:p>
        </text:list-item>
        <text:list-item>
          <text:p text:style-name="P332"><text:span text:style-name="T712">심장에 에너지가 모이면서 80가지 분별심이 사라지고 사공의 단계가 찰나의 순간에 지나감.</text:span><text:span/></text:p>
        </text:list-item>
        <text:list-item>
          <text:p text:style-name="P333"><text:span text:style-name="T713">해체 직후 궁극의 죽음의 정광명이 발생하며 의식의 가장 순수한 상태를 마주함.</text:span><text:span/></text:p>
        </text:list-item>
        <text:list-item>
          <text:p text:style-name="P334"><text:span text:style-name="T714">미세한 바람을 원인으로 삼아 역순으로 의식이 깨어나며 예전의 의생신을 그대로 재성취함.</text:span><text:span/></text:p>
        </text:list-item>
      </text:list>
      <text:p text:style-name="P335"><text:span text:style-name="T715"><text:soft-page-break/></text:span><text:span text:style-name="T716"/><text:span text:style-name="T717"/></text:p>
      <text:p text:style-name="P336"><text:span text:style-name="T718">[🟢 Online Mode | 26.06.05_15:08:17]</text:span><text:span/></text:p>
      <text:p text:style-name="P337"><text:span text:style-name="T719">86. 옛 몸과의 결별과 업의 고리 단절</text:span><text:span/></text:p>
      <text:p text:style-name="P338"><text:span text:style-name="T720">🔑 핵심 키워드: 바르도 유정, 옛 몸, 업의 고리, 유가사지론, 집착의 초월</text:span><text:span/></text:p>
      <text:p text:style-name="P339"><text:span text:style-name="T721">🪞 영혼의 거울에 비친 옛 집</text:span><text:span/></text:p>
      <text:p text:style-name="P340"><text:span text:style-name="T722">바르도 상태에 완전히 접어든 존재는 영적인 눈을 떠서 자신이 방금 전까지 숨을 쉬며 머물렀던 과거의 육체를 고스란히 내려다보게 돼. 마치 평생을 소중하고 고맙게 타다가 수명이 다해 폐차장에 깨끗하게 세워둔 오래된 자동차를 멀리서 바라보는 것과 같지. 운전석 시트에는 여전히 내 몸에 맞춘 흔적이 가득하고 외형도 아주 익숙하지만, 이미 열쇠도 없고 시동도 다시는 걸리지 않는 차라는 걸 직감하는 순간이야.</text:span><text:span/></text:p>
      <text:p text:style-name="P341"><text:span text:style-name="T723">🔗 끊어져 버린 업의 에너지 고리</text:span><text:span/></text:p>
      <text:p text:style-name="P342"><text:span text:style-name="T724">이때 우리의 상식과는 전혀 다른 아주 신기한 정신적 변화가 일어나는데, 그 육체를 빤히 보면서도 "아, 저게 내 몸이니까 당장 소유해야지!"라는 강한 집착이 전혀 생기지 않는다는 점이야. 불교의 위대한 논서인 유가사지론 본지분에서는 이것이 바로 물질과 의식을 묶어두던 업의 고리가 완전히 끊어졌기 때문이라고 명쾌하게 설명하고 있어. 두 부품을 단단하게 접착해 주던 영적인 접착제의 유효기간이 완전히 끝나서 자석의 극이 밀려나듯 자연스럽게 분리된 상태를 뜻해.</text:span><text:span/></text:p>
      <text:p text:style-name="P343"><text:span text:style-name="T725">🚪 되돌아갈 수 없는 문과 욕망의 소멸</text:span><text:span/></text:p>
      <text:p text:style-name="P344"><text:span text:style-name="T726">옛 몸을 바로 눈앞에 두고도 그 속으로 다시 뚜벅뚜벅 걸어 들어가고 싶다는 욕구 자체가 마법처럼 사라져 버려. 비유하자면, 계약 기간이 완벽하게 끝나서 집주인에게 열쇠를 반납하고 완전히 이사를 나온 옛날 전셋집을 길에서 우연히 마주쳤을 때의 느낌과 비슷해. 한때는 내 모든 희로애락이 담긴 소중한 보금자리였지만 이제는 서류상으로나 심리적으로나 완벽한 남의 집이 되었기에, 다시 그 문을 열고 들어가 살고 싶다는 마음이 눈곱만큼도 들지 않는 것과 같은 이치지.</text:span><text:span/></text:p>
      <text:p text:style-name="P345"><text:span text:style-name="T727">🕊️ 새로운 차원으로 향하는 존재의 자유</text:span><text:span/></text:p>
      <text:p text:style-name="P346"><text:span text:style-name="T728">과거의 낡은 껍데기에 대한 집착을 이토록 깔끔하게 내려놓을 수 있기에, 바르도의 존재는 뒤를 돌아보며 슬퍼하거나 미련을 두는 대신 앞으로 나아갈 수 있는 에너지를 얻게 돼. 과거라는 무거운 뽈대를 과감하게 끊어내야만 비로소 다음 생이라는 새로운 대양을 향해 힘차게 돛을 올릴 수 있거든. 육체와의 완벽한 작별은 결국 서글픈 이별이 아니라, 존재가 다음 여정을 자유롭게 시작할 수 있도록 이끄는 우주의 정교한 배려이자 필수적인 관문이란다.</text:span><text:span/></text:p>
      <text:p text:style-name="P347"><text:span text:style-name="T729">📝 핵심 요약</text:span><text:span/></text:p>
      <text:list text:style-name="WWNum18" text:continue-numbering="true">
        <text:list-item>
          <text:p text:style-name="P348"><text:span text:style-name="T730">바르도 상태의 존재는 자신이 생전에 사용했던 옛 육체를 직접 객관적으로 목격하게 된다.</text:span><text:span/></text:p>
        </text:list-item>
        <text:list-item>
          <text:p text:style-name="P349"><text:span text:style-name="T731">유가사지론에 따르면 영혼과 육체를 묶던 업의 고리가 끊어졌기 때문에 소유욕이 일어나지 않는다.</text:span><text:span/></text:p>
        </text:list-item>
        <text:list-item>
          <text:p text:style-name="P350"><text:span text:style-name="T732">이는 계약이 끝나 열쇠를 반납한 옛집처럼 다시 육체 안으로 들어가려는 욕구 자체가 소멸함을 뜻한다.</text:span><text:span/></text:p>
        </text:list-item>
        <text:list-item>
          <text:p text:style-name="P351"><text:span text:style-name="T733">과거의 육체에 대한 미련을 완전히 내려놓음으로써 다음 생을 향한 새로운 여정에 집중할 수 있게 된다.</text:span><text:span/></text:p>
        </text:list-item>
      </text:list>
      <text:p text:style-name="P352"><text:span text:style-name="T734"><text:soft-page-break/></text:span><text:span text:style-name="T735"/><text:span text:style-name="T736"/></text:p>
      <text:p text:style-name="P353"><text:span text:style-name="T737">[🟢 Online Mode | 26.06.05_15:08:23]</text:span><text:span/></text:p>
      <text:p text:style-name="P354"><text:span text:style-name="T738">87. 바르도 수명 계산의 오해와 시간의 진실</text:span><text:span/></text:p>
      <text:p text:style-name="P355"><text:span text:style-name="T739">🔑 핵심 키워드: 바르도 수명, 7일 기준, 육도세계의 하루, 시간 계산의 오류, 대전환의 모순</text:span><text:span/></text:p>
      <text:p text:style-name="P356"><text:span text:style-name="T740">⏳ 7일이라는 바르도 수명의 오해</text:span><text:span/></text:p>
      <text:p text:style-name="P357"><text:span text:style-name="T741">바르도 상태에 머무는 기간이 최대 7일이라는 가르침을 두고, 일부에서는 태어날 세계의 시간 기준으로 해석해야 한다고 주장해. 예를 들어 신들이 사는 천상계나 고통스러운 지옥의 하루는 인간계의 수백, 수천 년과 맞먹을 정도로 기니까, 그 세계의 기준으로 7일을 계산해야 한다는 논리지. 하지만 이건 마치 대한민국에서 발행한 7일짜리 무료 숙박권을 들고 우주선에 탑승한 뒤, 여기는 지구와 시간의 흐름이 다르니 내 마음대로 수백 년 동안 묵겠다고 떼를 쓰는 것과</text:span><text:span text:style-name="T742"> 같이 억지스러운 생각이야.</text:span><text:span/></text:p>
      <text:p text:style-name="P358"><text:span text:style-name="T743">🌀 수백만 년의 정체가 만드는 거대한 모순</text:span><text:span/></text:p>
      <text:p text:style-name="P359"><text:span text:style-name="T744">만약 그 억지 주장대로 지옥이나 천상계의 하루를 기준으로 바르도의 시간을 계산하게 되면, 아주 심각한 교리적 모순에 빠지게 돼. 깨달음이나 다음 생을 향해 역동적으로 움직여야 할 의식이, 태어날 조건조차 찾지 못한 채 바르도 상태에서 수백만 년 동안 허공을 떠돌며 멈춰 있어야 한다는 결론이 나오거든. 이는 마치 고성능 컴퓨터가 부팅되는 그 짧은 찰나의 대기 화면 상태로 수십 년 동안 멈추어 서서 아무런 작업도 하지 못하고 방치되는 것과 다를 바 없는 엄청</text:span><text:span text:style-name="T745">난 오류야.</text:span><text:span/></text:p>
      <text:p text:style-name="P360"><text:span text:style-name="T746">🌍 인간계를 기준으로 흐르는 우주적 타이밍</text:span><text:span/></text:p>
      <text:p text:style-name="P361"><text:span text:style-name="T747">밀교에서 말하는 바르도의 7일은 특정 다른 세계의 상대적 시간이 아니라, 우리가 숨 쉬고 있는 이 인간계의 보편적인 시간 체계를 기준으로 삼아. 바르도 유정은 아주 미세한 에너지로 이루어진 존재이기 때문에, 물질적인 시공간의 왜곡에 휘둘리지 않고 정해진 순리에 따라 신속하게 다음 여정을 준비하지. 복잡한 국제공항에서 환승할 때, 목적지 국가의 시차가 아니라 지금 내가 서 있는 환승 공항의 시계에 맞춰 탑승 게이트로 이동해야 안전하게 다음 비행기를 탈 수 </text:span><text:span text:style-name="T748">있는 것과 같은 이치야.</text:span><text:span/></text:p>
      <text:p text:style-name="P362"><text:span text:style-name="T749">🚪 정해진 기한 내에 이루어지는 완벽한 환생</text:span><text:span/></text:p>
      <text:p text:style-name="P363"><text:span text:style-name="T750">결국 바르도 상태는 오랜 세월 머무는 정착지가 아니라, 다음 생으로 넘어가기 위해 거쳐 가는 신속하고 정확한 간이역일 뿐이야. 정해진 인간계 기준의 시간 안에서 인연과 조건을 찾아 빠르게 움직여야만 의식이 오염되거나 길을 잃지 않고 올바른 태어남을 맞이할 수 있어. 이 시간의 법칙을 명확히 이해하는 것은, 죽음 이후의 혼란스러운 여정 속에서 우리가 시간의 미로에 갇히지 않고 깨달음의 타이밍을 정확하게 잡아낼 수 있도록 돕는 든든한 등대가 되어 줄 거야.</text:span><text:span/></text:p>
      <text:p text:style-name="P364"><text:span text:style-name="T751">📝 핵심 요약</text:span><text:span/></text:p>
      <text:list text:style-name="WWNum19" text:continue-numbering="true">
        <text:list-item>
          <text:p text:style-name="P365"><text:span text:style-name="T752">바르도의 수명인 7일을 환생할 지옥이나 천상계의 하루 기준으로 계산하는 것은 잘못된 주장이다.</text:span><text:span/></text:p>
        </text:list-item>
        <text:list-item>
          <text:p text:style-name="P366"><text:span text:style-name="T753">타계의 기준으로 계산하면 다음 생의 조건을 얻지 못한 채 수백만 년 동안 바르도에 머무는 모순이 발생한다.</text:span><text:span/></text:p>
        </text:list-item>
        <text:list-item>
          <text:p text:style-name="P367"><text:span text:style-name="T754">밀교에서 규정하는 바르도의 시간은 오직 인간계의 시공간 흐름을 기준으로 삼는다.</text:span><text:span/></text:p>
        </text:list-item>
        <text:list-item>
          <text:p text:style-name="P368"><text:span text:style-name="T755">바르도는 정착지가 아닌 신속한 간이역이므로 정해진 기한 내에 정확한 환생의 흐름을 따라야 한다.</text:span><text:span/></text:p>
        </text:list-item>
      </text:list>
      <text:p text:style-name="P369"><text:span text:style-name="T756"><text:soft-page-break/></text:span><text:span text:style-name="T757"/><text:span text:style-name="T758"/></text:p>
      <text:p text:style-name="P370"><text:span text:style-name="T759">[🟢 Online Mode | 26.06.05_15:08:30]</text:span><text:span/></text:p>
      <text:p text:style-name="P371"><text:span text:style-name="T760">88. 다음 생의 목적지를 결정하는 영혼의 마지막 이탈 게이트</text:span><text:span/></text:p>
      <text:p text:style-name="P372"><text:span text:style-name="T761">🔑 핵심 키워드: 의식의 이탈, 행선지 결정, 출구의 차별, 쌈부따 딴뜨라</text:span><text:span/></text:p>
      <text:p text:style-name="P373"><text:span text:style-name="T762">✈️ 행선지에 따라 달라지는 탑승 게이트</text:span><text:span/></text:p>
      <text:p text:style-name="P374"><text:span text:style-name="T763">사람이 죽음을 맞이할 때 몸 안에 머물던 미세한 의식은 신체의 특정 부위를 통해 외부로 빠져나가게 돼. 마치 거대한 국제공항에서 내가 어느 나라로 가느냐에 따라 지정된 탑승 게이트가 각각 다른 것과 아주 똑같은 원리야. 이 마지막 이탈 경로가 어디냐에 따라 다음 생에 어떤 세상에 태어날지가 결정된다고 밀교 경전인 쌈부따 딴뜨라는 전하고 있어.</text:span><text:span/></text:p>
      <text:p text:style-name="P375"><text:span text:style-name="T764">🗺️ 신체 부위별 다음 생의 목적지 지도</text:span><text:span/></text:p>
      <text:p text:style-name="P376"><text:span text:style-name="T765">의식이 빠져나가는 통로는 몸의 가장 아래쪽부터 꼭대기까지 아주 세밀하게 나뉘어 있는데, 이를 정리하면 다음과 같아.</text:span><text:span/></text:p>
      <table:table table:style-name="ta4">
        <table:table-columns>
          <table:table-column table:style-name="co8"/>
          <table:table-column table:style-name="co9"/>
        </table:table-columns>
        <table:table-row table:style-name="ro13" table:default-cell-style-name="ce32">
          <table:table-cell table:style-name="ce33">
            <text:p text:style-name="P377"><text:span text:style-name="T766">의식의 이탈 출구</text:span><text:span/></text:p>
          </table:table-cell>
          <table:table-cell table:style-name="ce34">
            <text:p text:style-name="P378"><text:span text:style-name="T767">새로 태어날 다음 생의 세계</text:span><text:span/></text:p>
          </table:table-cell>
        </table:table-row>
        <table:table-row table:style-name="ro14" table:default-cell-style-name="ce32">
          <table:table-cell table:style-name="ce35">
            <text:p text:style-name="P379"><text:span text:style-name="T768">항문</text:span><text:span/></text:p>
          </table:table-cell>
          <table:table-cell table:style-name="ce36">
            <text:p text:style-name="P380"><text:span text:style-name="T769">고통이 가득한 지옥</text:span><text:span/></text:p>
          </table:table-cell>
        </table:table-row>
        <table:table-row table:style-name="ro15" table:default-cell-style-name="ce32">
          <table:table-cell table:style-name="ce37">
            <text:p text:style-name="P381"><text:span text:style-name="T770">입</text:span><text:span/></text:p>
          </table:table-cell>
          <table:table-cell table:style-name="ce38">
            <text:p text:style-name="P382"><text:span text:style-name="T771">늘 굶주리는 아귀</text:span><text:span/></text:p>
          </table:table-cell>
        </table:table-row>
        <table:table-row table:style-name="ro16" table:default-cell-style-name="ce32">
          <table:table-cell table:style-name="ce39">
            <text:p text:style-name="P383"><text:span text:style-name="T772">요도</text:span><text:span/></text:p>
          </table:table-cell>
          <table:table-cell table:style-name="ce40">
            <text:p text:style-name="P384"><text:span text:style-name="T773">미혹된 축생</text:span><text:span/></text:p>
          </table:table-cell>
        </table:table-row>
        <table:table-row table:style-name="ro17" table:default-cell-style-name="ce32">
          <table:table-cell table:style-name="ce41">
            <text:p text:style-name="P385"><text:span text:style-name="T774">눈</text:span><text:span/></text:p>
          </table:table-cell>
          <table:table-cell table:style-name="ce42">
            <text:p text:style-name="P386"><text:span text:style-name="T775">고뇌와 기쁨이 공존하는 인간</text:span><text:span/></text:p>
          </table:table-cell>
        </table:table-row>
        <table:table-row table:style-name="ro18" table:default-cell-style-name="ce32">
          <table:table-cell table:style-name="ce43">
            <text:p text:style-name="P387"><text:span text:style-name="T776">배꼽</text:span><text:span/></text:p>
          </table:table-cell>
          <table:table-cell table:style-name="ce44">
            <text:p text:style-name="P388"><text:span text:style-name="T777">욕망을 누리는 욕계 하늘</text:span><text:span/></text:p>
          </table:table-cell>
        </table:table-row>
        <table:table-row table:style-name="ro19" table:default-cell-style-name="ce32">
          <table:table-cell table:style-name="ce45">
            <text:p text:style-name="P389"><text:span text:style-name="T778">코</text:span><text:span/></text:p>
          </table:table-cell>
          <table:table-cell table:style-name="ce46">
            <text:p text:style-name="P390"><text:span text:style-name="T779">강한 힘을 지닌 야차</text:span><text:span/></text:p>
          </table:table-cell>
        </table:table-row>
        <table:table-row table:style-name="ro20" table:default-cell-style-name="ce32">
          <table:table-cell table:style-name="ce47">
            <text:p text:style-name="P391"><text:span text:style-name="T780">귀</text:span><text:span/></text:p>
          </table:table-cell>
          <table:table-cell table:style-name="ce48">
            <text:p text:style-name="P392"><text:span text:style-name="T781">천신지명인 둡빼하나 인비인</text:span><text:span/></text:p>
          </table:table-cell>
        </table:table-row>
        <table:table-row table:style-name="ro21" table:default-cell-style-name="ce32">
          <table:table-cell table:style-name="ce49">
            <text:p text:style-name="P393"><text:span text:style-name="T782">미간</text:span><text:span/></text:p>
          </table:table-cell>
          <table:table-cell table:style-name="ce50">
            <text:p text:style-name="P394"><text:span text:style-name="T783">삼매의 희열을 누리는 색계 하늘</text:span><text:span/></text:p>
          </table:table-cell>
        </table:table-row>
        <table:table-row table:style-name="ro22" table:default-cell-style-name="ce32">
          <table:table-cell table:style-name="ce51">
            <text:p text:style-name="P395"><text:span text:style-name="T784">정수리</text:span><text:span/></text:p>
          </table:table-cell>
          <table:table-cell table:style-name="ce52">
            <text:p text:style-name="P396"><text:span text:style-name="T785">형상이 없는 순수 의식의 무색계 하늘</text:span><text:span/></text:p>
          </table:table-cell>
        </table:table-row>
      </table:table>
      <text:p text:style-name="P397"><text:span text:style-name="T786">🕳️ 아래로 향하는 비상구와 낮은 세계</text:span><text:span/></text:p>
      <text:p text:style-name="P398"><text:span text:style-name="T787">몸의 하부에 위치한 출구들은 대개 번뇌와 업장이 두터울 때 열리는 하강의 통로라고 볼 수 있어. 전력 시스템으로 치면 과부하가 걸려 전류가 바닥의 접지선이나 하수구로 흘러내려 버리는 것과 비슷하지. 탐욕과 진심, 치심에 사로잡혀 에너지가 아래로 쏠리면 항문이나 입, 요도 같은 곳을 통해 의식이 빠져나가며 지옥, 아귀, 축생이라는 고통스러운 악도에 발을 디디게 돼.</text:span><text:span/></text:p>
      <text:p text:style-name="P399"><text:span text:style-name="T788">🚀 하늘을 향해 열린 정수리의 헬기 패드</text:span><text:span/></text:p>
      <text:p text:style-name="P400"><text:span text:style-name="T789">반대로 미간이나 정수리처럼 몸의 가장 높은 곳에 있는 출구들은 깊은 명상과 선업을 쌓은 이들이 마주하는 상승의 통로야. 초고층 빌딩 꼭대기에 위치한 헬기 패드에서 비행기가 하늘을 향해 곧장 날아오르는 모습을 떠올려봐. 모든 물질적 형상마저 초월하여 순수한 의식의 세계인 무색계로 나아갈 때 영혼은 가장 높은 정수리를 열고 우주의 대허공으로 확장해 나가는 거지.</text:span><text:span/></text:p>
      <text:p text:style-name="P401"><text:span text:style-name="T790">📝 핵심 요약</text:span><text:span/></text:p>
      <text:list text:style-name="WWNum20" text:continue-numbering="true">
        <text:list-item>
          <text:p text:style-name="P402"><text:span text:style-name="T791">죽음의 순간 의식이 몸을 떠나는 출구에 따라 다음 생의 목적지가 결정됨.</text:span><text:span/></text:p>
        </text:list-item>
        <text:list-item>
          <text:p text:style-name="P403"><text:span text:style-name="T792">하부의 출구인 항문, 입, 요도는 지옥, 아귀, 축생 같은 낮은 세계로 연결됨.</text:span><text:span/></text:p>
        </text:list-item>
        <text:list-item>
          <text:p text:style-name="P404"><text:span text:style-name="T793">중간의 출구인 눈, 배꼽, 코, 귀는 인간계와 욕계 하늘, 야차의 세계로 연결됨.</text:span><text:span/></text:p>
        </text:list-item>
        <text:list-item>
          <text:p text:style-name="P405"><text:span text:style-name="T794">상부의 출구인 미간과 정수리는 깊은 삼매의 경지인 색계와 무색계 하늘로 향함.</text:span><text:span/></text:p>
        </text:list-item>
      </text:list>
      <text:p text:style-name="P406"><text:span text:style-name="T795"><text:soft-page-break/></text:span><text:span text:style-name="T796"/><text:span text:style-name="T797"/></text:p>
      <text:p text:style-name="P407"><text:span text:style-name="T798">89. 의식이 몸을 떠나는 두 단계의 비밀 통로</text:span><text:span/></text:p>
      <text:p text:style-name="P408"><text:span text:style-name="T799">🔑 핵심 키워드: 유가사지론, 심장, 의식의 이탈, 신체의 문</text:span><text:span/></text:p>
      <text:p text:style-name="P409"><text:span text:style-name="T800">❓ 유가사지론의 기록과 겉보기 모순</text:span><text:span/></text:p>
      <text:p text:style-name="P410"><text:span text:style-name="T801">대승불교의 위대한 논서인 『유가사지론』을 보면 "사람이 죽어 몸을 버릴 때 의식은 심장에서 떠난다"고 기록되어 있어. 그런데 밀교의 여러 가르침에서는 의식이 정수리나 눈, 코 등 몸에 있는 다양한 구멍들을 통해 빠져나간다고 설명하니까 겉보기에는 두 가르침이 정면으로 부딪히는 것처럼 느껴질 수 있지. 이 오랜 의문을 풀기 위해서는 의식이 육체를 벗어나는 메커니즘을 조금 더 미세하게 들여다봐야 해.</text:span><text:span/></text:p>
      <text:p text:style-name="P411"><text:span text:style-name="T802">🏠 내부 출발지와 외부 출구의 명확한 구분</text:span><text:span/></text:p>
      <text:p text:style-name="P412"><text:span text:style-name="T803">이 모순을 해결하는 열쇠는 바로 '몸 안에서의 이탈'과 '몸 밖으로의 탈출'을 구분하는 것에 있어. 결론부터 말하자면 두 가르침은 전혀 어긋나지 않아. 의식이 육체라는 거대한 집을 나설 때, 가장 먼저 발을 떼고 출발하는 내부의 안방은 심장이 맞아. 하지만 그 방에서 나온 의식이 최종적으로 집 바깥세상으로 완전히 빠져나갈 때는 각기 다른 외벽의 대문들을 통과하게 되는 법이거든.</text:span><text:span/></text:p>
      <text:p text:style-name="P413"><text:span text:style-name="T804">🚉 기차역 승강장과 지상 출구의 비유</text:span><text:span/></text:p>
      <text:p text:style-name="P414"><text:span text:style-name="T805">이해를 돕기 위해 거대한 지하철역을 떠올려보자. 네가 역을 완전히 빠져나가기 위해 가장 먼저 발을 떼는 곳은 지하 깊은 곳에 있는 승강장(심장)이야. 승강장을 떠나 계단을 걸어 올라간 뒤, 최종적으로는 각자 목적지에 맞는 1번 출구, 2번 출구(각각의 문)를 선택해 지상 밖으로 나가게 되잖아? 『유가사지론』은 의식이 최초로 탈착하는 지하 승강장을 말한 것이고, 밀교의 차제는 최종적으로 빠져나가는 지상의 출구를 설명한 셈이지.</text:span><text:span/></text:p>
      <text:p text:style-name="P415"><text:span text:style-name="T806">🚪 업력에 따라 열리는 운명의 출입구</text:span><text:span/></text:p>
      <text:p text:style-name="P416"><text:span text:style-name="T807">심장을 떠난 미세한 의식 기류는 평소 쌓아온 업의 성질이나 수행의 깊이에 따라 몸의 상부나 하부에 있는 특정한 문을 향해 이동하게 돼. 어떤 문을 통해 바깥세상으로 나가느냐에 따라 다음 생의 방향이 완전히 결정되기 때문에 밀교에서는 이 출구를 통제하는 수행을 아주 강조한단다. 최초의 출발지인 심장에서 에너지를 잘 갈무리하여 가장 청정한 문으로 의식을 인도하는 것이 바로 성불의 핵심 원리야.</text:span><text:span/></text:p>
      <text:p text:style-name="P417"><text:span text:style-name="T808">📝 핵심 요약</text:span><text:span/></text:p>
      <text:list text:style-name="WWNum21" text:continue-numbering="true">
        <text:list-item>
          <text:p text:style-name="P418"><text:span text:style-name="T809">『유가사지론』의 심장 이탈설과 밀교의 다문 출구설은 전혀 모순되지 않음</text:span><text:span/></text:p>
        </text:list-item>
        <text:list-item>
          <text:p text:style-name="P419"><text:span text:style-name="T810">의식이 몸 안에서 처음 움직이기 시작하는 최초의 출발지는 심장이 맞음</text:span><text:span/></text:p>
        </text:list-item>
        <text:list-item>
          <text:p text:style-name="P420"><text:span text:style-name="T811">심장을 벗어난 의식이 최종적으로 몸 밖으로 나갈 때는 신체의 다양한 문을 통과함</text:span><text:span/></text:p>
        </text:list-item>
        <text:list-item>
          <text:p text:style-name="P421"><text:span text:style-name="T812">이는 지하 승강장(심장)에서 출발해 지상의 특정 출구(문)로 빠져나가는 기차역의 원리와 같음</text:span><text:span/></text:p>
        </text:list-item>
      </text:list>
      <text:p text:style-name="P422"><text:span text:style-name="T813"><text:soft-page-break/></text:span><text:span text:style-name="T814"/><text:span text:style-name="T815"/></text:p>
      <text:p text:style-name="P423"><text:span text:style-name="T816">90. 구사론의 의문과 의식 소멸의 참된 의미</text:span><text:span/></text:p>
      <text:p text:style-name="P424"><text:span text:style-name="T817">🔑 핵심 키워드: 구사론, 의식의 사멸, 몸의 감관, 빠져나가는 통로, 교학의 조화</text:span><text:span/></text:p>
      <text:p text:style-name="P425"><text:span text:style-name="T818">❓ 다음 생의 목적지에 따른 의식의 마지막 흔적</text:span><text:span/></text:p>
      <text:p text:style-name="P426"><text:span text:style-name="T819">세친 보살의 구사론을 보면 아주 흥미로운 이야기가 나와. 사람이 죽을 때 다음 생에 어디로 태어나느냐에 따라 의식이 마지막으로 멈추는 신체 부위가 다르다는 거야. 예를 들어 지옥 같은 나쁜 세계에 떨어질 때는 발에서, 다시 인간으로 태어날 때는 배꼽에서, 천신이 되거나 깨달음을 얻은 아라한이 죽을 때는 심장에서 의식이 멎는다고 해. 이 이야기를 처음 들으면 마치 다음 생의 성적표에 따라 영혼이 나가는 출구 문이 각각 다르게 열리는 것처럼 느껴져서 고개를 </text:span><text:span text:style-name="T820">갸우뚱하게 만들지.</text:span><text:span/></text:p>
      <text:p text:style-name="P427"><text:span text:style-name="T821">🔌 신체 스위치가 차례로 꺼지는 정전 현상</text:span><text:span/></text:p>
      <text:p text:style-name="P428"><text:span text:style-name="T822">하지만 주석서인 구사론석의 설명을 깊이 들여다보면, 이것은 의식이 진짜 그곳을 통해 몸 밖으로 탈출한다는 뜻이 아니야. 우리 몸이라는 거대한 가전제품의 플러그가 뽑힐 때, 전류가 신체 부위별로 서서히 차단되는 현상으로 이해해야 해. 즉, 발이나 배꼽, 심장 같은 특정 장소에서 몸의 감각을 담당하는 신근이 작동을 멈추는 힘 때문에, 그 부위의 거친 의식이 최종적으로 사멸하는 도리를 보여주는 것이지. 스마트폰의 배터리가 닳을 때 화면 위쪽부터 서서히 어두워지</text:span><text:span text:style-name="T823">며 꺼지는 것과 비슷한 이치야.</text:span><text:span/></text:p>
      <text:p text:style-name="P429"><text:span text:style-name="T824">🚪 종착역과 출입문을 혼동하지 않는 지혜</text:span><text:span/></text:p>
      <text:p text:style-name="P430"><text:span text:style-name="T825">여기서 우리가 꼭 구별해야 할 핵심은 의식이 멎는 장소와 의식이 밖으로 빠져나가는 통로가 완전히 다르다는 점이야. 기차역에 비유하자면, 열차가 운행을 마치고 전원을 끄는 종착 플랫폼과 승객들이 역전 광장으로 걸어 나가는 출구 게이트를 헷갈리면 안 되는 것과 같아. 구사론의 설명은 의식이 그 신체 부위에서 활동을 마감하고 멈춘다는 조작적 정지를 뜻할 뿐, 영혼이 발가락이나 배꼽을 구멍 삼아 바깥으로 쏙 빠져나간다는 물리적 이동을 말하는 게 아니란다.</text:span><text:span/></text:p>
      <text:p text:style-name="P431"><text:span text:style-name="T826">🤝 두 가지 위대한 가르침의 완벽한 악수</text:span><text:span/></text:p>
      <text:p text:style-name="P432"><text:span text:style-name="T827">이러한 정확한 해석 덕분에, 의식이 중심 통로를 통해 심장으로 모여 정광명으로 녹아든다는 무상유가딴뜨라의 깊은 가르침과 구사론의 전통적인 설명은 서로 전혀 모순되지 않고 완벽하게 조화를 이루게 돼. 서로 다른 방향을 가리키는 것처럼 보였던 두 표지판이, 사실은 하나의 거대한 진리를 서로 다른 각도에서 보여주고 있었던 셈이지. 이처럼 겉보기에 어긋나는 듯한 교학의 의문점들을 바르게 풀어낼 때 우리의 이해도 한층 더 깊고 단단해질 수 있어.</text:span><text:span/></text:p>
      <text:p text:style-name="P433"><text:span text:style-name="T828">📝 핵심 요약</text:span><text:span/></text:p>
      <text:list text:style-name="WWNum22" text:continue-numbering="true">
        <text:list-item>
          <text:p text:style-name="P434"><text:span text:style-name="T829">구사론은 죽음의 단계에서 다음 생의 목적지에 따라 의식이 발, 배꼽, 심장에서 멎는다고 설명한다.</text:span><text:span/></text:p>
        </text:list-item>
        <text:list-item>
          <text:p text:style-name="P435"><text:span text:style-name="T830">이는 의식이 그곳을 통해 몸 밖으로 나가는 것이 아니라, 해당 부위의 신체 감관이 정지하면서 의식이 사멸함을 뜻한다.</text:span><text:span/></text:p>
        </text:list-item>
        <text:list-item>
          <text:p text:style-name="P436"><text:span text:style-name="T831">의식이 활동을 멈추는 종착 장소와 실제로 몸을 빠져나가는 출구 통로는 명확히 구별되어야 한다.</text:span><text:span/></text:p>
        </text:list-item>
        <text:list-item>
          <text:p text:style-name="P437"><text:span text:style-name="T832">이 해석을 통해 구사론의 전통 교학과 무상유가딴뜨라의 미세한 의식 가르침은 모순 없이 완벽하게 조화를 이룬다.</text:span><text:span/></text:p>
        </text:list-item>
      </text:list>
      <text:p text:style-name="P438"><text:span text:style-name="T833"><text:soft-page-break/></text:span><text:span text:style-name="T834"/><text:span text:style-name="T835"/></text:p>
      <text:p text:style-name="P439"><text:span text:style-name="T836">91. 바르도 세계의 독특한 시각과 인지 법칙</text:span><text:span/></text:p>
      <text:p text:style-name="P440"><text:span text:style-name="T837">🔑 핵심 키워드: 바르도 유정, 하늘눈, 구사론, 상계와 하계의 인지</text:span><text:span/></text:p>
      <text:p text:style-name="P441"><text:span text:style-name="T838">👁️ 동류끼리만 통하는 주파수와 시각</text:span><text:span/></text:p>
      <text:p text:style-name="P442"><text:span text:style-name="T839">바르도 상태의 존재들은 아무나 서로를 볼 수 있는 게 아니라 오직 자신과 같은 차원이나 종류에 속한 존재들만 서로를 알아볼 수 있어. 온라인 게임을 할 때 같은 서버와 같은 채널에 접속한 유저들끼리만 서로의 캐릭터를 보고 대화할 수 있는 것과 아주 비슷하지. 차원이 다르면 바로 옆에 공간을 공유하고 있어도 전혀 인지하지 못하는 독특한 주파수 제한이 걸려 있는 셈이야.</text:span><text:span/></text:p>
      <text:p text:style-name="P443"><text:span text:style-name="T840">🌌 수행으로 닦은 청정한 하늘눈의 관찰</text:span><text:span/></text:p>
      <text:p text:style-name="P444"><text:span text:style-name="T841">살아있는 존재 중에서 예외적으로 바르도를 볼 수 있는 방법이 있는데, 바로 청정한 하늘눈을 가진 이들의 시선을 통해서야. 불교에서 천안통이라고도 불리는 이 능력은 일종의 영적인 고성능 투시 카메라와 같아서 물질의 장벽을 넘어 미세한 영혼의 움직임까지 선명하게 포착해내지. 거친 육체에 갇힌 일반 중생의 제한된 시력을 넘어서서 차원이 다른 세계를 꿰뚫어 보는 특별한 렌즈라고 이해하면 돼.</text:span><text:span/></text:p>
      <text:p text:style-name="P445"><text:span text:style-name="T842">📷 타고난 카메라와 튜닝된 카메라의 차이</text:span><text:span/></text:p>
      <text:p text:style-name="P446"><text:span text:style-name="T843">재미있는 점은 이 하늘눈에도 성능의 등급이 명확하게 나뉜다는 거야. 과거의 업력 때문에 태어날 때부터 자연스럽게 얻은 내장형 하늘눈은 화질이 떨어지는 구형 스마트폰 카메라 같아서 바르도의 미세한 모습을 맑게 보지 못해 노이즈가 끼기 쉽지. 반면에 깊은 명상과 수행의 힘으로 정교하게 조율하고 닦아낸 하늘눈은 잡티를 완벽하게 제거한 최고급 망원경 같아서 미세한 에너지의 흐름까지 한눈에 완벽하게 식별해낼 수 있어.</text:span><text:span/></text:p>
      <text:p text:style-name="P447"><text:span text:style-name="T844">🏢 높은 층에서 아래를 내려다보는 시선</text:span><text:span/></text:p>
      <text:p text:style-name="P448"><text:span text:style-name="T845">마지막으로 바르도 세계에는 차원의 높고 낮음에 따른 엄격한 계층적 시선 법칙이 존재해. 천상계처럼 높은 차원에 속하는 상계의 바르도 존재는 자신보다 아래 차원에 있는 하계의 존재들을 아주 훤히 내려다볼 수 있지만, 반대로 낮은 차원의 존재는 위쪽 차원의 존재를 결코 보지 못하지. 50층 펜트하우스에 사는 사람이 창밖으로 아래 길거리의 풍경을 다 내려다볼 수 있지만, 길을 가던 사람이 선팅된 고층 빌딩 내부를 들여다볼 수 없는 것과 똑같은 이치야.</text:span><text:span/></text:p>
      <text:p text:style-name="P449"><text:span text:style-name="T846">📝 핵심 요약</text:span><text:span/></text:p>
      <text:list text:style-name="WWNum23" text:continue-numbering="true">
        <text:list-item>
          <text:p text:style-name="P450"><text:span text:style-name="T847">바르도 존재들은 자신과 같은 부류나 차원에 속한 동류들끼리만 서로를 인지할 수 있음.</text:span><text:span/></text:p>
        </text:list-item>
        <text:list-item>
          <text:p text:style-name="P451"><text:span text:style-name="T848">물질적 육신이 없지만 특별한 능력을 지닌 하늘눈을 통해서 바르도의 모습을 관찰할 수 있음.</text:span><text:span/></text:p>
        </text:list-item>
        <text:list-item>
          <text:p text:style-name="P452"><text:span text:style-name="T849">생득적으로 타고난 하늘눈은 불완전하지만 수행의 명상 힘으로 닦은 하늘눈은 극도로 청정함.</text:span><text:span/></text:p>
        </text:list-item>
        <text:list-item>
          <text:p text:style-name="P453"><text:span text:style-name="T850">높은 차원의 바르도 존재는 낮은 차원을 내려다볼 수 있으나 그 반대의 시선은 차단됨.</text:span><text:span/></text:p>
        </text:list-item>
      </text:list>
      <text:p text:style-name="P454"><text:span text:style-name="T851"><text:soft-page-break/></text:span><text:span text:style-name="T852"/><text:span text:style-name="T853"/></text:p>
      <text:p text:style-name="P455"><text:span text:style-name="T854">92. 바르도 유정의 아담한 크기와 영적 유연성</text:span><text:span/></text:p>
      <text:p text:style-name="P456"><text:span text:style-name="T855">🔑 핵심 키워드: 바르도 유정, 남섬부주, 구사론석, 크기의 유연성, 영적 형태</text:span><text:span/></text:p>
      <text:p text:style-name="P457"><text:span text:style-name="T856">🧑 새 출발을 준비하는 아담한 아바타</text:span><text:span/></text:p>
      <text:p text:style-name="P458"><text:span text:style-name="T857">우리가 이 세상에 다시 인간으로 태어나기 위해 거치는 바르도 상태에서는 아주 독특한 신체적 특징을 가지게 돼. 무겁고 거대한 육체를 벗어던진 상태이기 때문에 이때의 몸은 아주 가볍고 아담한 형태를 띠게 되지. 이는 마치 넓은 세상으로 본격적인 모험을 떠나기 전, 캐릭터 생성 창에서 마주하는 작고 귀여운 시작 단계의 아바타와 비슷해. 비록 크기는 작지만 앞으로 새로운 인생을 펼쳐나갈 모든 영적인 잠재력과 에너지를 압축해서 품고 있는 소중한 형태란다.</text:span><text:span/></text:p>
      <text:p text:style-name="P459"><text:span text:style-name="T858">🎒 다섯 살 아이 크기의 영적 원석</text:span><text:span/></text:p>
      <text:p text:style-name="P460"><text:span text:style-name="T859">오래된 불교 논서인 구사론석에서는 우리가 살고 있는 이 남섬부주에 인간으로 태어날 바르도 존재의 크기를 대략 다섯 살에서 여섯 살 정도 된 어린아이의 몸집과 같다고 설명하고 있어. 커다란 아름드리나무가 되기 직전의 아주 작고 파릇파릇한 새싹 같은 상태라고 보면 이해하기 쉽지. 다 자란 어른의 무겁고 둔한 몸이 아니라, 순수하고 때 묻지 않은 아이의 형상을 하고 있다는 점이 참 오묘한 부분이야.</text:span><text:span/></text:p>
      <text:p text:style-name="P461"><text:span text:style-name="T860">🌊 규격화되지 않은 자유로운 형태</text:span><text:span/></text:p>
      <text:p text:style-name="P462"><text:span text:style-name="T861">하지만 이 크기가 공장에서 찍어내는 기성품 인형처럼 모든 존재에게 똑같이 자로 잰 듯 고정되어 있는 것은 아니야. 텍스트에서도 설명하듯이 이것이 일률적으로 딱 정해진 절대적인 규칙은 아니라고 말하지. 마치 형태를 마음대로 바꿀 수 있는 부드러운 찰흙처럼, 각자의 업과 정신적인 에너지 상태에 따라 조금씩 크기와 형태가 달라질 수 있는 유연성을 가지고 있어. 영적인 세계에서는 물질적인 고정관념이 통하지 않음을 보여주는 증거지.</text:span><text:span/></text:p>
      <text:p text:style-name="P463"><text:span text:style-name="T862">🕊️ 다음 생을 향해 가벼워진 영혼의 배낭</text:span><text:span/></text:p>
      <text:p text:style-name="P464"><text:span text:style-name="T863">결국 바르도 존재가 이토록 작고 아담한 형상을 취하는 것은 다음 목적지를 향해 가장 가볍고 효율적인 상태로 여행을 하기 위함이야. 무거운 겨울 외투를 벗고 가벼운 옷차림으로 비행기에 오르는 것처럼, 전생의 무거운 카르마와 신체적 짐을 최소화한 채 오직 핵심 의식만을 담아 이동하는 지혜로운 자연의 법칙이지. 이 아담한 형태 속에서 우리는 다음 생이라는 새로운 도화지에 어떤 그림이든 그릴 수 있는 순수한 준비를 마치게 돼.</text:span><text:span/></text:p>
      <text:p text:style-name="P465"><text:span text:style-name="T864">📝 핵심 요약</text:span><text:span/></text:p>
      <text:list text:style-name="WWNum24" text:continue-numbering="true">
        <text:list-item>
          <text:p text:style-name="P466"><text:span text:style-name="T865">남섬부주에 인간으로 태어날 바르도 존재는 대략 5-6세 어린아이 정도의 아담한 크기를 지닌다.</text:span><text:span/></text:p>
        </text:list-item>
        <text:list-item>
          <text:p text:style-name="P467"><text:span text:style-name="T866">이 크기는 고정된 법칙이 아니며 각 존재의 영적 상태에 따라 일률적이지 않고 유연하게 변할 수 있다.</text:span><text:span/></text:p>
        </text:list-item>
        <text:list-item>
          <text:p text:style-name="P468"><text:span text:style-name="T867">어린아이 같은 형상은 거친 육체의 짐을 벗고 새로운 탄생을 준비하는 순수한 새싹과 같다.</text:span><text:span/></text:p>
        </text:list-item>
        <text:list-item>
          <text:p text:style-name="P469"><text:span text:style-name="T868">아담하고 가벼운 신체적 형태는 다음 생의 여정을 향해 의식을 가장 효율적으로 이동시키는 구조다.</text:span><text:span/></text:p>
        </text:list-item>
      </text:list>
      <text:p text:style-name="P470"><text:span text:style-name="T869"><text:soft-page-break/></text:span><text:span text:style-name="T870"/><text:span text:style-name="T871"/></text:p>
      <text:p text:style-name="P471"><text:span text:style-name="T872">[🔴 Offline Mode | 26.06.05_15:17:23]</text:span><text:span/></text:p>
      <text:p text:style-name="P472"><text:span text:style-name="T873">93. 바르도 유정이 마주하는 어둠과 달빛의 징후</text:span><text:span/></text:p>
      <text:p text:style-name="P473"><text:span text:style-name="T874">🔑 핵심 키워드: 삼악도, 삼선취, 검은 어둠, 은은한 달빛, 유가사지론</text:span><text:span/></text:p>
      <text:p text:style-name="P474"><text:span text:style-name="T875">🖤 나쁜 세계로 향하는 어두운 장막</text:span><text:span/></text:p>
      <text:p text:style-name="P475"><text:span text:style-name="T876">지옥이나 아귀, 축생처럼 고통이 가득한 나쁜 세계로 향하는 존재들은 그들의 눈앞에 온통 검은색 담요를 넓게 펴놓은 것 같은 막막한 풍경을 마주하게 돼. 혹은 칠흑 같은 밤에 한 줄기 빛도 없이 깊은 어둠이 온 사방을 무겁게 뒤덮은 것 같은 상태를 경험하지. 이것은 마치 우리가 갑작스럽게 정전이 된 깊은 지하실에 홀로 갇혔을 때 느끼는 아득함과 두려움 같은 거야. 자신이 지은 부정적인 업의 그림자가 의식을 가려서 온통 어둡고 무거운 세계만을 비추어 보여주는</text:span><text:span text:style-name="T877"> 셈이지.</text:span><text:span/></text:p>
      <text:p text:style-name="P476"><text:span text:style-name="T878">🤍 좋은 세계로 인도하는 하얀 길</text:span><text:span/></text:p>
      <text:p text:style-name="P477"><text:span text:style-name="T879">반대로 하늘 세계나 인간 세상처럼 평온하고 행복한 좋은 세계에 태어날 존재들은 전혀 다른 풍경을 보게 된단다. 그들의 앞에는 눈부시게 깨끗한 흰색 담요를 정성스럽게 펴놓은 것 같은 모습이 나타나거나, 은은한 달빛이 온 세상을 따스하고 평화롭게 감싸 안는 듯한 아름다운 풍경이 펼쳐지지. 이는 마치 한낮의 뜨거운 열기가 서서히 가라앉은 선선한 가을밤에 아름다운 보름달이 정원을 환하게 비출 때 느끼는 아늑함과 안도감과 같아. 선한 마음의 씨앗이 맑고 환한 빛의</text:span><text:span text:style-name="T880"> 통로를 열어주는 거야.</text:span><text:span/></text:p>
      <text:p text:style-name="P478"><text:span text:style-name="T881">🎨 업이 만들어내는 의식의 가상현실</text:span><text:span/></text:p>
      <text:p text:style-name="P479"><text:span text:style-name="T882">유가사지론에서 설명하는 이러한 현상은 바르도의 존재가 장차 마주할 운명을 미리 보여주는 마음의 정밀한 예고편과도 같단다. 우리가 스마트폰으로 내비게이션을 켤 때 목적지가 위험한 길이면 화면에 경고등이 들어오고, 안전한 길이면 푸른 빛으로 편안하게 안내하는 것과 비슷한 이치지. 바르도의 유정들이 마주하는 어둠과 달빛은 외부에 실재하는 풍경이 아니라, 그동안 살아오면서 마음속에 켜켜이 쌓아온 업의 에너지가 의식의 스크린 위에 그대로 투영되어 나타나는 신비로운</text:span><text:span text:style-name="T883"> 가상현실이야.</text:span><text:span/></text:p>
      <text:p text:style-name="P480"><text:span text:style-name="T884">🧭 마음의 방향이 결정하는 미래의 풍경</text:span><text:span/></text:p>
      <text:p text:style-name="P481"><text:span text:style-name="T885">결국 이 구절이 우리에게 전하고자 하는 핵심은 우리가 매 순간 어떤 마음을 품고 살아가느냐에 따라 미래에 마주할 의식의 풍경이 완전히 달라진다는 사실이야. 거칠고 부정적인 마음은 스스로를 깊은 어둠의 장막 속에 가두어 버리지만, 맑고 자비로운 마음은 칠흑 같은 바르도의 바다 속에서도 은은한 달빛 같은 평온한 이정표를 스스로 만들어내지. 죽음 이후의 세계마저도 결국 지금 이 순간 우리가 가꾸어 나가는 마음의 결에 의해 정교하게 디자인된다는 생명의 준엄한 법</text:span><text:span text:style-name="T886">칙을 보여주는 거란다.</text:span><text:span/></text:p>
      <text:p text:style-name="P482"><text:span text:style-name="T887">📝 핵심 요약</text:span><text:span/></text:p>
      <text:list text:style-name="WWNum25" text:continue-numbering="true">
        <text:list-item>
          <text:p text:style-name="P483"><text:span text:style-name="T888">나쁜 세계인 삼악도로 향하는 존재는 검은 담요나 칠흑 같은 밤의 어둠과 같은 형상을 마주함.</text:span><text:span/></text:p>
        </text:list-item>
        <text:list-item>
          <text:p text:style-name="P484"><text:span text:style-name="T889">좋은 세계인 삼선취로 향하는 존재는 흰 담요나 은은하게 비치는 밤의 달빛과 같은 형상을 마주함.</text:span><text:span/></text:p>
        </text:list-item>
        <text:list-item>
          <text:p text:style-name="P485"><text:span text:style-name="T890">이러한 풍경은 유가사지론에 기록된 내용으로 장차 태어날 세계에 대한 의식의 예고편 역할을 함.</text:span><text:span/></text:p>
        </text:list-item>
        <text:list-item>
          <text:p text:style-name="P486"><text:span text:style-name="T891">외부의 물리적 풍경이 아니라 자신이 지은 업의 결과에 따라 의식 위에 투영되는 마음의 현실임.</text:span><text:span/></text:p>
        </text:list-item>
      </text:list>
      <text:p text:style-name="P487"><text:span text:style-name="T892"><text:soft-page-break/></text:span><text:span text:style-name="T893"/><text:span text:style-name="T894"/></text:p>
      <text:p text:style-name="P488"><text:span text:style-name="T895">[🟢 Online Mode | 26.06.05_15:17:29]</text:span><text:span/></text:p>
      <text:p text:style-name="P489"><text:span text:style-name="T896">94. 운명의 궤도에 따라 달라지는 바르도의 빛깔</text:span><text:span/></text:p>
      <text:p text:style-name="P490"><text:span text:style-name="T897">🔑 핵심 키워드: 바르도 색상, 운명적 색채, 입태경, 여섯 갈래 길, 카르마 스펙트럼</text:span><text:span/></text:p>
      <text:p text:style-name="P491"><text:span text:style-name="T898">🌌 업의 거울이 되는 바르도의 신체 색깔</text:span><text:span/></text:p>
      <text:p text:style-name="P492"><text:span text:style-name="T899">바르도 상태에 있는 중간 존재의 몸은 자신이 다음 생에 어떤 세상으로 태어날지에 따라 고유한 색깔을 띠게 된단다. 마치 투명한 유리에 어떤 색깔의 조명을 비추느냐에 따라 유리의 빛깔이 완전히 달라 보이는 것처럼, 내면에 쌓인 카르마의 주파수가 영적인 몸의 색깔로 투명하게 드러나는 현상이지. 부처님이 설하신 입태경의 말씀에 따르면, 끔찍한 고통을 겪는 지옥에 떨어질 존재는 불에 바짝 그슬린 검은 나무토막 같은 색을 띠고, 늘 굶주림에 시달리는 아귀로 태어날</text:span><text:span text:style-name="T900"> 존재는 차가운 푸른 물빛을 나타낸다고 해.</text:span><text:span/></text:p>
      <text:p text:style-name="P493"><text:span text:style-name="T901">💨 축생과 인간 세계를 향하는 영혼의 빛</text:span><text:span/></text:p>
      <text:p text:style-name="P494"><text:span text:style-name="T902">어리석음의 굴레에 갇혀 동물로 태어날 바르도 유정은 사방으로 흩어지는 흐릿한 연기 빛깔을 품게 된단다. 반면 우리가 살고 있는 인간 세상이나 감각적 즐거움이 가득한 욕계의 천신으로 태어날 존재들은 아주 따스하고 풍요로운 황금빛을 띠게 되지. 이것은 마치 배우가 무대에 오르기 전, 그의 역할이 비극인지 혹은 화려한 주인공인지에 따라 무대 뒤편의 의상 색깔이 이미 결정되는 것과 같은 원리야.</text:span><text:span/></text:p>
      <text:p text:style-name="P495"><text:span text:style-name="T903">🤍 높은 정신 세계의 흰색 광명</text:span><text:span/></text:p>
      <text:p text:style-name="P496"><text:span text:style-name="T904">물질적인 욕망을 넘어 깊은 명상의 기쁨을 누리는 색계의 천상 세계로 향하는 존재는 온 세상이 정화되는 듯한 순수한 흰색의 몸을 얻게 돼. 이처럼 바르도의 색깔은 단순한 장식이 아니라 다음 목적지를 알려주는 영적인 이정표인 셈이지. 자신이 지은 마음의 성향이 사후의 신체 스펙트럼을 그대로 결정한다는 진실은 일상에서 우리가 어떤 생각과 마음을 품고 살아야 하는지 깊이 돌아보게 만들어.</text:span><text:span/></text:p>
      <text:p text:style-name="P497"><text:span text:style-name="T905">📊 환생할 세계에 따른 바르도 신체의 색상 표</text:span><text:span/></text:p>
      <text:p text:style-name="P498"><text:span text:style-name="T906">입태경에서 가르치는 다섯 가지 존재 형태에 따른 영체의 구체적인 빛깔을 직관적인 표로 정리해서 보여줄게.</text:span><text:span/></text:p>
      <table:table table:style-name="ta5">
        <table:table-columns>
          <table:table-column table:style-name="co10"/>
          <table:table-column table:style-name="co11"/>
          <table:table-column table:style-name="co12"/>
        </table:table-columns>
        <table:table-row table:style-name="ro23" table:default-cell-style-name="ce53">
          <table:table-cell table:style-name="ce54">
            <text:p text:style-name="P499"><text:span text:style-name="T907">태어날 세계</text:span><text:span/></text:p>
          </table:table-cell>
          <table:table-cell table:style-name="ce55">
            <text:p text:style-name="P500"><text:span text:style-name="T908">영체의 구체적인 색상</text:span><text:span/></text:p>
          </table:table-cell>
          <table:table-cell table:style-name="ce56">
            <text:p text:style-name="P501"><text:span text:style-name="T909">일상적인 비유</text:span><text:span/></text:p>
          </table:table-cell>
        </table:table-row>
        <table:table-row table:style-name="ro24" table:default-cell-style-name="ce53">
          <table:table-cell table:style-name="ce57">
            <text:p text:style-name="P502"><text:span text:style-name="T910">지옥</text:span><text:span/></text:p>
          </table:table-cell>
          <table:table-cell table:style-name="ce58">
            <text:p text:style-name="P503"><text:span text:style-name="T911">불에 그슬린 검은색</text:span><text:span/></text:p>
          </table:table-cell>
          <table:table-cell table:style-name="ce59">
            <text:p text:style-name="P504"><text:span text:style-name="T912">타버린 나무토막</text:span><text:span/></text:p>
          </table:table-cell>
        </table:table-row>
        <table:table-row table:style-name="ro25" table:default-cell-style-name="ce53">
          <table:table-cell table:style-name="ce60">
            <text:p text:style-name="P505"><text:span text:style-name="T913">아귀</text:span><text:span/></text:p>
          </table:table-cell>
          <table:table-cell table:style-name="ce61">
            <text:p text:style-name="P506"><text:span text:style-name="T914">차가운 푸른색</text:span><text:span/></text:p>
          </table:table-cell>
          <table:table-cell table:style-name="ce62">
            <text:p text:style-name="P507"><text:span text:style-name="T915">깊고 투명한 물빛</text:span><text:span/></text:p>
          </table:table-cell>
        </table:table-row>
        <table:table-row table:style-name="ro26" table:default-cell-style-name="ce53">
          <table:table-cell table:style-name="ce63">
            <text:p text:style-name="P508"><text:span text:style-name="T916">축생</text:span><text:span/></text:p>
          </table:table-cell>
          <table:table-cell table:style-name="ce64">
            <text:p text:style-name="P509"><text:span text:style-name="T917">흐릿한 회색</text:span><text:span/></text:p>
          </table:table-cell>
          <table:table-cell table:style-name="ce65">
            <text:p text:style-name="P510"><text:span text:style-name="T918">피어오르는 연기</text:span><text:span/></text:p>
          </table:table-cell>
        </table:table-row>
        <table:table-row table:style-name="ro27" table:default-cell-style-name="ce53">
          <table:table-cell table:style-name="ce66">
            <text:p text:style-name="P511"><text:span text:style-name="T919">인간 및 욕계 천신</text:span><text:span/></text:p>
          </table:table-cell>
          <table:table-cell table:style-name="ce67">
            <text:p text:style-name="P512"><text:span text:style-name="T920">찬란한 황금색</text:span><text:span/></text:p>
          </table:table-cell>
          <table:table-cell table:style-name="ce68">
            <text:p text:style-name="P513"><text:span text:style-name="T921">귀하고 따뜻한 금빛</text:span><text:span/></text:p>
          </table:table-cell>
        </table:table-row>
        <table:table-row table:style-name="ro28" table:default-cell-style-name="ce53">
          <table:table-cell table:style-name="ce69">
            <text:p text:style-name="P514"><text:span text:style-name="T922">색계 천신</text:span><text:span/></text:p>
          </table:table-cell>
          <table:table-cell table:style-name="ce70">
            <text:p text:style-name="P515"><text:span text:style-name="T923">순수한 흰색</text:span><text:span/></text:p>
          </table:table-cell>
          <table:table-cell table:style-name="ce71">
            <text:p text:style-name="P516"><text:span text:style-name="T924">정화된 하얀 광명</text:span><text:span/></text:p>
          </table:table-cell>
        </table:table-row>
      </table:table>
      <text:p text:style-name="P517"><text:span text:style-name="T925">📝 핵심 요약</text:span><text:span/></text:p>
      <text:list text:style-name="WWNum26" text:continue-numbering="true">
        <text:list-item>
          <text:p text:style-name="P518"><text:span text:style-name="T926">바르도 유정의 신체 색깔은 다음 생에 태어날 세계의 성격을 미리 보여주는 영적 거울이야.</text:span><text:span/></text:p>
        </text:list-item>
        <text:list-item>
          <text:p text:style-name="P519"><text:span text:style-name="T927">지옥은 불에 탄 나무토막 같은 검은색, 아귀는 푸른 물빛, 축생은 연기 색을 띠게 돼.</text:span><text:span/></text:p>
        </text:list-item>
        <text:list-item>
          <text:p text:style-name="P520"><text:span text:style-name="T928">인간과 욕계 천신으로 향하는 존재는 황금빛을 나타내며, 색계 천신은 순수한 흰색의 몸을 얻어.</text:span><text:span/></text:p>
        </text:list-item>
        <text:list-item>
          <text:p text:style-name="P521"><text:span text:style-name="T929">부처님이 입태경에서 설하신 이 색상들은 마음의 상태가 사후 세계의 신체 형태까지 결정함을 증명해.</text:span><text:span/></text:p>
        </text:list-item>
      </text:list>
      <text:p text:style-name="P522"><text:span text:style-name="T930"><text:soft-page-break/></text:span><text:span text:style-name="T931"/><text:span text:style-name="T932"/></text:p>
      <text:p text:style-name="P523"><text:span text:style-name="T933">[🟢 Online Mode | 26.06.05_15:21:30]</text:span><text:span/></text:p>
      <text:p text:style-name="P524"><text:span text:style-name="T934">95. 미래의 형상을 투영하는 바르도의 신체</text:span><text:span/></text:p>
      <text:p text:style-name="P525"><text:span text:style-name="T935">🔑 핵심 키워드: 바르도 유정, 형상 취함, 전유의 육신, 구사론, 미래의 모습</text:span><text:span/></text:p>
      <text:p text:style-name="P526"><text:span text:style-name="T936">🎭 미래의 모습을 미리 보여주는 아바타</text:span><text:span/></text:p>
      <text:p text:style-name="P527"><text:span text:style-name="T937">바르도에 머무는 존재가 어떤 외형을 가지게 되는지에 대한 비밀이야. 바르도의 유정은 아무런 형태가 없는 유령 같은 상태가 아니라, 자신이 다음 생에 태어날 세계의 모습을 미리 본떠서 임시 신체를 형성하게 돼. 비유하자면 온라인 게임을 본격적으로 시작하기 전에 캐릭터 생성 창에서 내가 앞으로 플레이할 종족과 외모를 미리 선택하고 세팅해 둔 게임 속 아바타와 아주 비슷하지. 아직 그 세계에 완전히 태어나지 않았지만, 이미 미래 존재의 형태를 완벽하게 예고하고</text:span><text:span text:style-name="T938"> 있는 거야.</text:span><text:span/></text:p>
      <text:p text:style-name="P528"><text:span text:style-name="T939">📐 본유의 육신과 다음 생의 설계도</text:span><text:span/></text:p>
      <text:p text:style-name="P529"><text:span text:style-name="T940">세친 보살의 위대한 논서인 구사론에서는 이 현상을 아주 명확하게 설명하고 있어. 어떤 세계에 태어나게 될 바르도의 유정은 그 세상에서 정상적인 수명을 살아가게 될 전형적인 육신이나 형상인 전유의 모습을 그대로 취한다는 거지.</text:span><text:span/></text:p>
      <text:list text:style-name="WWNum27" text:continue-numbering="true">
        <text:list-item>
          <text:p text:style-name="P530"><text:span text:style-name="T941">전유의 의미: 다음 생에서 가장 왕성하게 활동할 전성기의 신체적 형태</text:span><text:span/></text:p>
        </text:list-item>
        <text:list-item>
          <text:p text:style-name="P531"><text:span text:style-name="T942">형상 형성의 원리: 마음에 각인된 업의 이끌림에 따라 자동으로 형태가 직조됨</text:span><text:span/></text:p>
        </text:list-item>
        <text:list-item>
          <text:p text:style-name="P532"><text:span text:style-name="T943">직관적 비유: 건물을 실제로 짓기 전에 설계도를 바탕으로 정밀하게 만들어 둔 건축 조감도나 미니어처 모형을 미리 보는 것과 같음</text:span><text:span/></text:p>
        </text:list-item>
      </text:list>
      <text:p text:style-name="P533"><text:span text:style-name="T944">🗺️ 갈 곳에 따라 결정되는 영혼의 옷</text:span><text:span/></text:p>
      <table:table table:style-name="ta6">
        <table:table-columns>
          <table:table-column table:style-name="co13"/>
          <table:table-column table:style-name="co14"/>
          <table:table-column table:style-name="co15"/>
        </table:table-columns>
        <table:table-row table:style-name="ro29" table:default-cell-style-name="ce72">
          <table:table-cell table:style-name="ce73">
            <text:p text:style-name="P534"><text:span text:style-name="T945">예정된 환생 세계</text:span><text:span/></text:p>
          </table:table-cell>
          <table:table-cell table:style-name="ce74">
            <text:p text:style-name="P535"><text:span text:style-name="T946">바르도 존재가 취하는 신체의 형상</text:span><text:span/></text:p>
          </table:table-cell>
          <table:table-cell table:style-name="ce75">
            <text:p text:style-name="P536"><text:span text:style-name="T947">비유적 양상</text:span><text:span/></text:p>
          </table:table-cell>
        </table:table-row>
        <table:table-row table:style-name="ro30" table:default-cell-style-name="ce72">
          <table:table-cell table:style-name="ce76">
            <text:p text:style-name="P537"><text:span text:style-name="T948">인간계 또는 천상계</text:span><text:span/></text:p>
          </table:table-cell>
          <table:table-cell table:style-name="ce77">
            <text:p text:style-name="P538"><text:span text:style-name="T949">인간이나 천인의 아름답고 온전한 형상</text:span><text:span/></text:p>
          </table:table-cell>
          <table:table-cell table:style-name="ce78">
            <text:p text:style-name="P539"><text:span text:style-name="T950">자신에게 잘 어울리는 깨끗한 새 옷을 입은 모습</text:span><text:span/></text:p>
          </table:table-cell>
        </table:table-row>
        <table:table-row table:style-name="ro31" table:default-cell-style-name="ce72">
          <table:table-cell table:style-name="ce79">
            <text:p text:style-name="P540"><text:span text:style-name="T951">축생계 또는 악도</text:span><text:span/></text:p>
          </table:table-cell>
          <table:table-cell table:style-name="ce80">
            <text:p text:style-name="P541"><text:span text:style-name="T952">동물이나 거친 존재들의 왜소하거나 기괴한 형상</text:span><text:span/></text:p>
          </table:table-cell>
          <table:table-cell table:style-name="ce81">
            <text:p text:style-name="P542"><text:span text:style-name="T953">업의 찌꺼기로 인해 거칠고 낡은 옷을 걸친 모습</text:span><text:span/></text:p>
          </table:table-cell>
        </table:table-row>
      </table:table>
      <text:p text:style-name="P543"><text:span text:style-name="T954">어떤 세계로 갈지가 정해지면 그 영혼의 에너지는 목적지에 걸맞은 옷을 자연스럽게 입게 돼. 자석이 철가루를 특정한 모양으로 끌어당기듯, 지어놓은 업의 에너지가 다음 생의 신체 윤곽을 바르도 단계에서부터 미리 형성해 내는 셈이지.</text:span><text:span/></text:p>
      <text:p text:style-name="P544"><text:span text:style-name="T955">👥 물체보다 먼저 도착하는 존재의 그림자</text:span><text:span/></text:p>
      <text:p text:style-name="P545"><text:span text:style-name="T956">결국 바르도의 형상이라는 것은 다음 생이라는 실체가 등장하기 전에 허공에 미리 드리워지는 존재의 그림자와 같아. 해가 떠오를 때 언덕 너머에서 누군가 걸어오면 그 사람의 본모습이 눈에 보이기 전에 거대한 그림자가 먼저 땅에 나타나서 그가 누구인지 가늠하게 하잖아. 이처럼 바르도의 의생신은 다음 생의 물리적 탄생을 향해 달려가는 영혼이 영적으로 먼저 완성해 둔 완벽한 예고편이라고 볼 수 있어.</text:span><text:span/></text:p>
      <text:p text:style-name="P546"><text:span text:style-name="T957">📝 핵심 요약</text:span><text:span/></text:p>
      <text:list text:style-name="WWNum27" text:continue-numbering="true">
        <text:list-item>
          <text:p text:style-name="P547"><text:span text:style-name="T958">바르도 유정은 무형의 존재가 아니라 다음 생에 태어날 세계의 신체 형상을 미리 취함.</text:span><text:span/></text:p>
        </text:list-item>
        <text:list-item>
          <text:p text:style-name="P548"><text:span text:style-name="T959">구사론에 따르면 다음 세상의 전성기 신체 형태인 전유의 모습을 그대로 가짐.</text:span><text:span/></text:p>
        </text:list-item>
        <text:list-item>
          <text:p text:style-name="P549"><text:span text:style-name="T960">지은 업의 성질과 갈 곳에 따라 인간, 천인, 동물 등 신체의 윤곽이 완벽하게 결정됨.</text:span><text:span/></text:p>
        </text:list-item>
        <text:list-item>
          <text:p text:style-name="P550"><text:span text:style-name="T961">이는 실제 태어나기 전에 에너지가 먼저 형태를 갖추는 일종의 존재적 예고편임.</text:span><text:span/></text:p>
        </text:list-item>
      </text:list>
      <text:p text:style-name="P551"><text:span text:style-name="T962"><text:soft-page-break/></text:span><text:span text:style-name="T963"/><text:span text:style-name="T964"/></text:p>
      <text:p text:style-name="P552"><text:span text:style-name="T965">[🟢 Online Mode | 26.06.05_15:18:01]</text:span><text:span/></text:p>
      <text:p text:style-name="P553"><text:span text:style-name="T966">96. 끝없이 순환하는 생명의 네 가지 정거장</text:span><text:span/></text:p>
      <text:p text:style-name="P554"><text:span text:style-name="T967">🔑 핵심 키워드: 사유, 생유, 전유, 사유, 중유</text:span><text:span/></text:p>
      <text:p text:style-name="P555"><text:span text:style-name="T968">🌱 새로운 시작의 찰나와 일상의 대여정</text:span><text:span/></text:p>
      <text:p text:style-name="P556"><text:span text:style-name="T969">우리의 존재는 단 한 순간도 멈추지 않고 네 가지 커다란 정거장을 돌며 끝없이 순환하게 돼. 그 첫 번째 정거장이 바로 새로운 생명이 잉태되어 모태에 들어가는 최초의 순간인 생유야. 컴퓨터로 치면 전원 버튼을 누르자마자 메인보드에 아주 미세한 최초의 전류가 통하는 찰나와 같지. 그리고 그 바로 다음 찰나부터 죽음이 찾아오기 전까지 우리가 흔히 인생이라고 부르는 기나긴 시간 전체를 전유 혹은 본유라고 불러. 전원을 켜고 컴퓨터로 열심히 문서를 작성하고 동영</text:span><text:span text:style-name="T970">상을 보며 일상을 보내는 기나긴 가동 시간 전체를 뜻하는 단어란다.</text:span><text:span/></text:p>
      <text:p text:style-name="P557"><text:span text:style-name="T971">🎬 막을 내리는 순간과 순수한 빛의 시간</text:span><text:span/></text:p>
      <text:p text:style-name="P558"><text:span text:style-name="T972">세 번째 정거장은 이 지상에서의 삶이 마침내 완전히 마침표를 찍는 사유의 단계야. 이것은 육체의 숨이 완전히 멈추는 최후의 찰나이기도 하면서, 마음의 가장 깊은 바닥인 죽음의 정광명을 온전히 경험하는 아주 거룩한 시간이기도 해. 우리가 하루 종일 사용하던 컴퓨터의 작업 창을 다 닫고 시스템 종료 버튼을 누르면, 화면이 완전히 꺼지기 직전 블랙 스크린에 잠시 순수한 전류의 잔상이 남는 것과 비슷하지. 육체라는 거친 껍데기를 완전히 벗어던지고 순수한 의식 본</text:span><text:span text:style-name="T973">연의 상태로 돌아가는 장엄한 이별의 순간이야.</text:span><text:span/></text:p>
      <text:p text:style-name="P559"><text:span text:style-name="T974">🌌 무대와 무대 사이의 신비로운 대기실</text:span><text:span/></text:p>
      <text:p text:style-name="P560"><text:span text:style-name="T975">마지막 네 번째 정거장이 바로 사유와 생유 사이의 공백을 채우는 바르도, 즉 중유의 단계란다. 육체는 이미 소멸하여 사라졌지만 아직 다음 생의 새로운 몸을 받지 못해 공중에 붕 떠 있는 기묘한 중간 상태를 말해. 연극배우가 1막 공연을 성공적으로 마치고 무대 뒤로 퇴장해서 다음 2막의 새로운 의상으로 갈아입기 위해 잠깐 머무는 분장실 겸 대기실이라고 생각하면 이해하기 쉬울 거야. 이전 생의 무대는 완전히 끝났고 다음 생의 무대는 아직 시작되지 않은, 오직</text:span><text:span text:style-name="T976"> 의식만으로 존재하는 순수한 에너지만의 공간이지.</text:span><text:span/></text:p>
      <text:p text:style-name="P561"><text:span text:style-name="T977">🔄 거대한 순환을 완성하는 네 가지 조각</text:span><text:span/></text:p>
      <text:p text:style-name="P562"><text:span text:style-name="T978">결국 불교에서 말하는 생명이라는 거대한 드라마는 이 네 가지 상태가 톱니바퀴처럼 정밀하게 맞물려 끊임없이 돌아가는 영원한 순환 구조를 가지고 있어. 생유에서 전유로, 전유에서 사유로, 사유에서 중유로, 그리고 다시 새로운 생유로 이어지는 과정은 시작도 끝도 없이 계속해서 연결되지. 우리는 보통 눈에 보이는 인생인 전유만이 삶의 전부라고 착각하기 쉽지만, 실제로는 보이지 않는 세 가지 정거장이 뒤에서 든든하게 받쳐주고 있기에 비로소 생명이라는 위대한 대서사</text:span><text:span text:style-name="T979">시가 멈추지 않고 완성되는 거란다.</text:span><text:span/></text:p>
      <text:p text:style-name="P563"><text:span text:style-name="T980">📝 핵심 요약</text:span><text:span/></text:p>
      <text:list text:style-name="WWNum28" text:continue-numbering="true">
        <text:list-item>
          <text:p text:style-name="P564"><text:span text:style-name="T981">생유는 새로운 생명이 시작되어 모태에 연결되는 최초의 찰나를 의미한다.</text:span><text:span/></text:p>
        </text:list-item>
        <text:list-item>
          <text:p text:style-name="P565"><text:span text:style-name="T982">전유는 태어난 두 번째 찰나부터 죽기 전까지 우리가 살아가는 평생의 삶을 뜻한다.</text:span><text:span/></text:p>
        </text:list-item>
        <text:list-item>
          <text:p text:style-name="P566"><text:span text:style-name="T983">사유는 죽음의 마지막 순간이자 마음의 가장 깊은 정광명을 경험하는 단계이다.</text:span><text:span/></text:p>
        </text:list-item>
        <text:list-item>
          <text:p text:style-name="P567"><text:span text:style-name="T984">중유는 죽음과 다음 탄생 사이의 중간 상태인 바르도를 가리키며, 이 네 단계가 끝없이 순환한다.</text:span><text:span/></text:p>
        </text:list-item>
      </text:list>
      <text:p text:style-name="P568"><text:span text:style-name="T985"><text:soft-page-break/></text:span><text:span text:style-name="T986"/><text:span text:style-name="T987"/></text:p>
      <text:p text:style-name="P569"><text:span text:style-name="T988">[🟢 Online Mode | 26.06.05_15:18:09]</text:span><text:span/></text:p>
      <text:p text:style-name="P570"><text:span text:style-name="T989">97. 바르도의 신체 형상에 대한 오해와 진실</text:span><text:span/></text:p>
      <text:p text:style-name="P571"><text:span text:style-name="T990">🔑 핵심 키워드: 전유, 바르도 형상, 3일 반의 오해, 람림첸모, 쫑카빠</text:span><text:span/></text:p>
      <text:p text:style-name="P572"><text:span text:style-name="T991">🎭 전생의 모습을 고집하는 오해와 착각</text:span><text:span/></text:p>
      <text:p text:style-name="P573"><text:span text:style-name="T992">바르도 상태에 진입한 존재가 전생의 육체적 모습을 그대로 유지할 것이라는 오해는 '전유'라는 단어를 잘못 해석한 데서 시작해. 전생의 기억과 습성이 남아있으니 몸도 당연히 그대로일 거라 착각하는 건데, 이는 마치 스마트폰을 최신형 모델로 완전히 교체했는데도 액정 화면과 외부 케이스까지 예전 단말기와 똑같은 형태일 거라고 고집하는 것과 같아. 물리적인 육체는 이미 수명을 다해 자연으로 돌아갔기 때문에, 미세한 의식의 상태인 바르도가 과거의 거친 물질적 형상</text:span><text:span text:style-name="T993">에 영원히 갇혀 있을 수는 없거든.</text:span><text:span/></text:p>
      <text:p text:style-name="P574"><text:span text:style-name="T994">⏳ 전반과 후반을 나누는 반반의 고정관념</text:span><text:span/></text:p>
      <text:p text:style-name="P575"><text:span text:style-name="T995">더 흥미로운 건, 다음 생의 모습을 취한다는 교리를 접한 사람들이 머리를 굴려 만들어낸 '3일 반'이라는 기묘한 절충안이야. 바르도가 유지되는 전체 기간인 7일을 딱 반으로 쪼개서, 앞의 3일 반은 전생의 얼굴로 살고 뒤의 3일 반은 후생의 모습으로 변신한다는 식의 발상이지. 이건 마치 서울에서 부산으로 기차를 타고 이사 가는데, 정확히 중간 지점인 대구역쯤 지나갈 때 몸의 절반만 새집에 맞는 옷으로 갈아입는다는 것처럼 아주 부자연스럽고 인위적인 상상력에</text:span><text:span text:style-name="T996"> 불과해.</text:span><text:span/></text:p>
      <text:p text:style-name="P576"><text:span text:style-name="T997">📜 쫑카빠 대사가 람림첸모에서 내린 결론</text:span><text:span/></text:p>
      <text:p text:style-name="P577"><text:span text:style-name="T998">티베트 밀교의 거장 쫑카빠 대사는 그의 위대한 저서인 『람림첸모』를 통해 이러한 반반식 주장들이 아무런 청정하고 확실한 근거가 없는 억측일 뿐이라고 명쾌하게 선을 그어. 올바른 경전의 전승이나 정확한 논리적 검증을 거치지 않고, 사람들이 문자의 표면적 의미나 단편적인 구절에만 매달려 제멋대로 상상해 낸 소설이라는 거지. 복잡하고 역동적인 영적 세계의 변화를 인간 중심의 단순한 시간 계산법으로 쪼개어 맞추려는 시도는 완벽한 오류라는 매서운 지적이야.</text:span><text:span/></text:p>
      <text:p text:style-name="P578"><text:span text:style-name="T999">🔮 미래를 향해 형성되는 미세한 의식의 몸</text:span><text:span/></text:p>
      <text:p text:style-name="P579"><text:span text:style-name="T1000">그렇다면 바르도의 진짜 모습은 어떨까? 바르도 유정은 고정된 과거의 형상에 얽매이지 않으며, 이미 다음 생에 태어날 유전적·업장적 성향에 맞춰 미세한 의식의 몸을 형성하기 시작해. 3일 반씩 기계적으로 외모를 바꾸는 전근대적인 변신 로봇이 아니라, 이미 다음 목적지를 향해 완벽하게 최적화되어 움직이는 순수한 에너지체인 셈이지. 이 왜곡 없는 진실을 바르게 마주할 때야말로 우리는 사후 세계의 혼란스러운 환영에 속지 않고 깨달음의 중심을 단단히 잡을 수 있어</text:span><text:span text:style-name="T1001">.</text:span><text:span/></text:p>
      <text:p text:style-name="P580"><text:span text:style-name="T1002">📝 핵심 요약</text:span><text:span/></text:p>
      <text:list text:style-name="WWNum29" text:continue-numbering="true">
        <text:list-item>
          <text:p text:style-name="P581"><text:span text:style-name="T1003">바르도 유정이 전생의 모습을 그대로 유지한다는 생각은 단어의 표면적 의미에 착각을 일으킨 오해다.</text:span><text:span/></text:p>
        </text:list-item>
        <text:list-item>
          <text:p text:style-name="P582"><text:span text:style-name="T1004">앞의 3일 반은 전생의 모습을, 뒤의 3일 반은 후생의 모습을 취한다는 주장은 근거 없는 인위적인 절충안에 불과하다.</text:span><text:span/></text:p>
        </text:list-item>
        <text:list-item>
          <text:p text:style-name="P583"><text:span text:style-name="T1005">쫑카빠 대사는 『람림첸모』에서 이러한 기간 분할 주장이 아무런 경전적 근거가 없는 명백한 억설임을 확언했다.</text:span><text:span/></text:p>
        </text:list-item>
        <text:list-item>
          <text:p text:style-name="P584"><text:span text:style-name="T1006">바르도 존재는 기계적인 외모 변화를 거치지 않으며, 이미 다음 생의 원인에 따라 미세한 의식의 몸을 갖춘다.</text:span><text:span/></text:p>
        </text:list-item>
      </text:list>
      <text:p text:style-name="P585"><text:span text:style-name="T1007"><text:soft-page-break/></text:span><text:span text:style-name="T1008"/><text:span text:style-name="T1009"/></text:p>
      <text:p text:style-name="P586"><text:span text:style-name="T1010">[🟢 Online Mode | 26.06.05_15:18:18]</text:span><text:span/></text:p>
      <text:p text:style-name="P587"><text:span text:style-name="T1011">98. 전유의 시간 기준과 구사론의 비밀</text:span><text:span/></text:p>
      <text:p text:style-name="P588"><text:span text:style-name="T1012">🔑 핵심 키워드: 전유의 기준, 후생의 사유, 바르도의 형태, 구사론의 문법</text:span><text:span/></text:p>
      <text:p text:style-name="P589"><text:span text:style-name="T1013">⏳ 시간의 기준점을 바로잡는 나침반</text:span><text:span/></text:p>
      <text:p text:style-name="P590"><text:span text:style-name="T1014">전유라는 단어에서 과거라는 말을 쓸 때, 우리가 무엇을 기준으로 삼아야 하는지 명확히 짚고 넘어가야 해. 이 과거라는 기준은 지금 막 지나온 바르도인 중간 상태를 기준으로 한 게 아니라, 앞으로 태어날 다음 생의 죽음인 사유를 기준으로 삼은 과거를 뜻해. 마치 우리가 해외여행 계획을 짤 때 현지 도착 날짜를 기준으로 d-day를 계산하는 것처럼, 기준점 자체가 이미 미래의 특정 사건에 고정되어 있는 독특한 시간 계산법이지.</text:span><text:span/></text:p>
      <text:p text:style-name="P591"><text:span text:style-name="T1015">🎭 미래의 모습을 미리 빌려 쓰는 렌탈숍</text:span><text:span/></text:p>
      <text:p text:style-name="P592"><text:span text:style-name="T1016">바르도 상태에 있는 존재는 앞으로 자기가 태어날 미래 생의 몸 형태를 미리 갖추게 되는데, 이걸 구사론에서는 전유에서 생기는 몸의 모습이라고 표현해. 이건 정식 출시될 신차의 디자인을 모터쇼에서 미리 보여주는 컨셉트 카나, 결혼식 날 입을 드레스를 몇 달 전에 리허설 숍에서 미리 대여해 입어보는 것과 같아. 아직 실제로 가보지 않은 다음 생이지만, 그 미래의 삶을 기준으로 이전 상태의 몸을 예형처럼 빌려 쓰고 있는 셈이지.</text:span><text:span/></text:p>
      <text:p text:style-name="P593"><text:span text:style-name="T1017">📜 구사론이 증명하는 미래형 문법의 비밀</text:span><text:span/></text:p>
      <text:p text:style-name="P594"><text:span text:style-name="T1018">세친 보살님의 위대한 저서인 구사론에서는 이 시간의 비밀을 풀기 위해 아주 정밀한 문법적 증거를 제시하고 있어. 경전에서 사용된 생김이라는 단어는 이미 지나간 과거를 말하는 게 아니라, 앞으로 다가올 미래에 일어날 일을 가리키는 표현이야. 스마트폰 예약 구매를 할 때 앞으로 받게 될 기기라고 미래형으로 명시해 두는 것처럼, 단어의 시제 자체가 과거가 아닌 미래의 탄생을 향해 열려 있다는 뜻이지.</text:span><text:span/></text:p>
      <text:p text:style-name="P595"><text:span text:style-name="T1019">🗺️ 얽힌 실타래를 푸는 정확한 좌표 설정</text:span><text:span/></text:p>
      <text:p text:style-name="P596"><text:span text:style-name="T1020">이처럼 미세한 시간과 존재의 흐름을 엄격하게 정의하는 이유는, 바르도라는 모호한 공간 속에서 의식이 길을 잃지 않도록 정확한 좌표를 찍어주기 위함이야. 기준점을 잘못 잡으면 내비게이션이 엉뚱한 길을 안내하듯 영적인 혼란이 생길 수 있거든. 다음 생의 죽음이라는 먼 미래를 기준으로 현재의 중간 몸을 정의함으로써, 윤회의 전 과정이 정교한 인과의 톱니바퀴처럼 한 치의 오차도 없이 맞물려 돌아가고 있음을 보여주는 거야.</text:span><text:span/></text:p>
      <text:p text:style-name="P597"><text:span text:style-name="T1021">📝 핵심 요약</text:span><text:span/></text:p>
      <text:list text:style-name="WWNum30" text:continue-numbering="true">
        <text:list-item>
          <text:p text:style-name="P598"><text:span text:style-name="T1022">전유라는 개념에서 과거를 판단하는 기준은 지나간 과거가 아니라 다음 생의 죽음임.</text:span><text:span/></text:p>
        </text:list-item>
        <text:list-item>
          <text:p text:style-name="P599"><text:span text:style-name="T1023">바르도의 몸은 미래에 태어날 생의 형태를 미리 취하므로 다음 생을 기준으로 작동함.</text:span><text:span/></text:p>
        </text:list-item>
        <text:list-item>
          <text:p text:style-name="P600"><text:span text:style-name="T1024">구사론에 등장하는 생김이라는 단어는 과거동사가 아니라 미래를 뜻하는 문법적 증거임.</text:span><text:span/></text:p>
        </text:list-item>
        <text:list-item>
          <text:p text:style-name="P601"><text:span text:style-name="T1025">이는 존재의 순환 과정을 미래의 인과적 기준점과 연결하여 정교하게 설명하는 방식임.</text:span><text:span/></text:p>
        </text:list-item>
      </text:list>
      <text:p text:style-name="P602"><text:span text:style-name="T1026"><text:soft-page-break/></text:span><text:span text:style-name="T1027"/><text:span text:style-name="T1028"/></text:p>
      <text:p text:style-name="P603"><text:span text:style-name="T1029">99. 바르도 존재의 완전무결한 감각과 오해의 교정</text:span><text:span/></text:p>
      <text:p text:style-name="P604"><text:span text:style-name="T1030">🔑 핵심 키워드: 바르도, 감각 기관, 유정의 모습, 완벽성</text:span><text:span/></text:p>
      <text:p text:style-name="P605"><text:span text:style-name="T1031">👤 다음 생의 투영과 흔한 오해</text:span><text:span/></text:p>
      <text:p text:style-name="P606"><text:span text:style-name="T1032">바르도 상태에 있는 존재는 다음 생에 어떤 몸으로 태어날지 그 대략적인 모습을 미리 갖추고 있다고 해. 그러다 보니 어떤 이들은 "다음 생에 눈이 보이지 않거나 신체적인 장애를 가지고 태어날 존재라면, 바르도 상태에 있을 때도 똑같이 감각 기관이 결여되어 있을 것"이라고 오해하곤 하지. 하지만 밀교의 깊은 가르침에서는 이러한 고정관념이 완전히 잘못된 생각이라고 명확하게 선을 긋고 있어.</text:span><text:span/></text:p>
      <text:p text:style-name="P607"><text:span text:style-name="T1033">🖥️ 디지털 도면과 3D 프린팅의 비유</text:span><text:span/></text:p>
      <text:p text:style-name="P608"><text:span text:style-name="T1034">이걸 쉽게 이해하려면 3D 프린터로 제품을 뽑기 전의 완벽한 디지털 디자인 도면을 떠올려봐. 컴퓨터 화면 속 도면 자체는 아무런 결함이 없는 완벽한 데이터 상태잖아? 하지만 막상 현실에서 프린터로 찍어내는 과정에서 재료가 부족하거나 환경이 나쁘면 완성품에 흠집이 나거나 구멍이 생길 수 있지. 바르도의 몸은 아직 거친 물질적 제약을 받지 않은 완벽한 에너지 도면 상태이기 때문에, 미래에 육체적 결함을 갖고 태어난다고 해서 도면 자체에 미리 구멍이 나 있는 </text:span><text:span text:style-name="T1035">것은 아니야.</text:span><text:span/></text:p>
      <text:p text:style-name="P609"><text:span text:style-name="T1036">🧬 자궁 내 발달과 바르도의 차이</text:span><text:span/></text:p>
      <text:p text:style-name="P610"><text:span text:style-name="T1037">실제로 시각이나 청각 같은 신체 기관이 결여되는 현상은 바르도 시기가 아니라, 바르도를 지나 모태나 구체적인 탄생의 장소에 생을 의탁하고 난 뒤에 육체가 세포 분열을 하며 형성되는 과정에서 발생하는 문제일 뿐이야. 불교의 온갖 경전과 논서를 아무리 뒤져봐도 바르도 존재가 감각 기관이 고장 난 채로 떠돌아다닌다고 기록된 곳은 단 한 군데도 없어. 바르도 유정은 그 자체로 아주 미세하고 순수한 바람과 마음의 결합체여서 오히려 모든 감각을 완전하게 작동할 수 </text:span><text:span text:style-name="T1038">있단다.</text:span><text:span/></text:p>
      <text:p text:style-name="P611"><text:span text:style-name="T1039">🚫 지나친 비약이 낳은 논리적 오류</text:span><text:span/></text:p>
      <text:p text:style-name="P612"><text:span text:style-name="T1040">미래의 모습을 닮는다는 원리를 너무 글자 그대로만 해석해서, 미래 육체가 가질 모든 장애와 한계까지 바르도 신체에 똑같이 복사되어야 한다고 주장하는 건 엄청난 모순이자 심각한 비약이야. 바르도의 몸은 다음 생의 대략적인 존재 형태와 업의 경향성을 보여주는 신비로운 에너지막일 뿐, 물질 세계의 물리적인 상처까지 고스란히 미리 겪고 있는 아바타가 아니라는 사실을 알아야 해.</text:span><text:span/></text:p>
      <text:p text:style-name="P613"><text:span text:style-name="T1041">📝 핵심 요약</text:span><text:span/></text:p>
      <text:list text:style-name="WWNum31" text:continue-numbering="true">
        <text:list-item>
          <text:p text:style-name="P614"><text:span text:style-name="T1042">다음 생에 장애를 갖게 되더라도 바르도 상태의 신체는 모든 감각 기관을 완벽하게 갖추고 있음</text:span><text:span/></text:p>
        </text:list-item>
        <text:list-item>
          <text:p text:style-name="P615"><text:span text:style-name="T1043">신체 기관의 결여는 바르도 기간이 아니라, 자궁 등 탄생처에 정착한 후 육체가 자라나는 과정에서 발생함</text:span><text:span/></text:p>
        </text:list-item>
        <text:list-item>
          <text:p text:style-name="P616"><text:span text:style-name="T1044">경전 어디에서도 바르도 존재의 감각 기관이 불완전하다고 설한 바 없음</text:span><text:span/></text:p>
        </text:list-item>
        <text:list-item>
          <text:p text:style-name="P617"><text:span text:style-name="T1045">바르도 신체가 다음 생의 모습을 지닌다는 것은 경향성의 표현일 뿐, 물질적 결함까지 똑같이 복사한다는 뜻이 아님</text:span><text:span/></text:p>
        </text:list-item>
      </text:list>
      <text:p text:style-name="P618"><text:span text:style-name="T1046"><text:soft-page-break/></text:span><text:span text:style-name="T1047"/><text:span text:style-name="T1048"/></text:p>
      <text:p text:style-name="P619"><text:span text:style-name="T1049">100. 바르도 유정의 목적지별 이동 모습과 방향</text:span><text:span/></text:p>
      <text:p text:style-name="P620"><text:span text:style-name="T1050">🔑 핵심 키워드: 바르도, 유가사지론, 이동 방식, 천신, 인간, 악도</text:span><text:span/></text:p>
      <text:p text:style-name="P621"><text:span text:style-name="T1051">🗺️ 행선지에 따라 달라지는 탑승 자세</text:span><text:span/></text:p>
      <text:p text:style-name="P622"><text:span text:style-name="T1052">바르도 상태에 있는 존재들이 움직이는 모습은 마치 놀이공원에서 어떤 기구를 타느냐에 따라 몸의 자세가 완전히 달라지는 것과 같아. 유가사지론 본지분에서는 다음 생에 태어날 세계가 어디냐에 따라 바르도 유정의 걷는 모양과 방향이 확연하게 갈린다고 설명하고 있지. 이는 마음의 지향성과 업의 무게가 몸의 움직임이라는 외적인 형태로 고스란히 시각화되어 드러나는 신비로운 현상이야.</text:span><text:span/></text:p>
      <text:p text:style-name="P623"><text:span text:style-name="T1053">🎈 천상을 향해 가볍게 솟구치는 걸음</text:span><text:span/></text:p>
      <text:p text:style-name="P624"><text:span text:style-name="T1054">먼저 다음 생에 하늘 세계, 즉 천신으로 태어날 바르도 유정들은 몸을 위로 향해서 걸어가게 돼. 헬륨 가스를 가득 채운 풍선이 하늘을 향해 아무런 거침없이 두둥실 떠오르는 것처럼, 선업의 긍정적인 에너지가 가득 찬 존재들은 중력을 거스르듯 가볍고 높게 솟구쳐 오르는 방향성을 지니지. 이들의 발걸음은 맑고 가벼운 마음의 상태를 그대로 반영하는 상승 기류와 같아.</text:span><text:span/></text:p>
      <text:p text:style-name="P625"><text:span text:style-name="T1055">🚶 일상을 향해 곧게 걸어가는 인간의 길</text:span><text:span/></text:p>
      <text:p text:style-name="P626"><text:span text:style-name="T1056">반면에 다시 인간 세계에 태어나게 될 바르도 유정들은 우리에게 가장 익숙한 모습인 앞으로 곧게 걷는 형태를 보여줘. 이는 마치 평평한 평지를 정면을 바라보며 뚜벅뚜벅 걸어가는 일상적인 보행과 똑같지. 치우침 없이 균형을 잡고 앞으로 나아가는 이 걸음걸이는, 너무 가볍지도 너무 무겁지도 않은 인간 세계의 업의 특징을 고스란히 담아낸 아주 안정적이고 보편적인 이동 방식이야.</text:span><text:span/></text:p>
      <text:p text:style-name="P627"><text:span text:style-name="T1057">📉 머리를 거꾸로 한 채 추락하는 악도의 무거움</text:span><text:span/></text:p>
      <text:p text:style-name="P628"><text:span text:style-name="T1058">마지막으로 지옥이나 아귀, 축생 같은 나쁜 세계에 떨어질 바르도 유정들은 충격적이게도 머리를 거꾸로 처박은 채 아래를 향해 걸어가게 돼. 번지점프를 하거나 낭떠러지 밑으로 무거운 돌멩이가 수직 낙하하듯, 어둡고 무거운 악업의 무게에 짓눌려 통제력을 잃고 아래로 추락하는 모습이지. 거꾸로 뒤집힌 자세는 그들의 마음이 분별과 집착으로 완전히 뒤틀려 있음을 보여주는 안타까운 징후이기도 해.</text:span><text:span/></text:p>
      <text:p text:style-name="P629"><text:span text:style-name="T1059">📝 핵심 요약</text:span><text:span/></text:p>
      <text:list text:style-name="WWNum32" text:continue-numbering="true">
        <text:list-item>
          <text:p text:style-name="P630"><text:span text:style-name="T1060">바르도 유정이 이동하는 방향과 자세는 다음 생에 태어날 세계에 따라 달라진다.</text:span><text:span/></text:p>
        </text:list-item>
        <text:list-item>
          <text:p text:style-name="P631"><text:span text:style-name="T1061">하늘 세계에 태어날 존재는 헬륨 풍선처럼 위를 향해 가볍게 걸어 올라간다.</text:span><text:span/></text:p>
        </text:list-item>
        <text:list-item>
          <text:p text:style-name="P632"><text:span text:style-name="T1062">인간 세계에 태어날 존재는 평지를 걷듯 앞을 향해 곧고 안정적으로 걸어간다.</text:span><text:span/></text:p>
        </text:list-item>
        <text:list-item>
          <text:p text:style-name="P633"><text:span text:style-name="T1063">악도에 떨어질 존재는 무거운 돌처럼 머리를 아래로 거꾸로 한 채 추락하듯 이동한다.</text:span><text:span/></text:p>
        </text:list-item>
      </text:list>
      <text:p text:style-name="P634"><text:span text:style-name="T1064"><text:soft-page-break/></text:span><text:span text:style-name="T1065"/><text:span text:style-name="T1066"/></text:p>
      <text:p text:style-name="P635"><text:span text:style-name="T1067">101. 욕계·색계 환생의 필수 관문과 무간업의 오해</text:span><text:span/></text:p>
      <text:p text:style-name="P636"><text:span text:style-name="T1068">🔑 핵심 키워드: 욕계와 색계, 바르도의 필수성, 무간업, 람림첸모의 교정</text:span><text:span/></text:p>
      <text:p text:style-name="P637"><text:span text:style-name="T1069">🌌 욕계와 색계라는 두 개의 거대한 세계</text:span><text:span/></text:p>
      <text:p text:style-name="P638"><text:span text:style-name="T1070">욕계는 거친 물질적 형상을 가지고 세속의 다양한 욕망을 누리며 살아가는 낮은 차원의 하늘이야. 반면 색계는 거친 욕망은 모두 가라앉고 아름다운 형상과 깊은 삼매의 희열만을 누리는 훨씬 높은 차원의 하늘이지. 이 두 세계는 각각 우리가 매일 치열하게 살아가는 시끌벅적한 도심지와, 모든 소음이 차단된 조용하고 가치 있는 고급 휴양지에 비유할 수 있어.</text:span><text:span/></text:p>
      <text:p text:style-name="P639"><text:span text:style-name="T1071">🎟️ 새로운 몸을 받기 위한 필수 환승역</text:span><text:span/></text:p>
      <text:p text:style-name="P640"><text:span text:style-name="T1072">이 두 가지 세계 중 어느 곳에 다시 태어나든, 중생들은 예외 없이 바르도라는 중간 상태를 반드시 통과해야만 해. 이것은 국제선 비행기를 타고 다른 나라로 이동할 때, 목적지가 어디든 상관없이 무조건 거쳐야 하는 공항의 환승 구역과 똑같아. 전생의 몸을 벗어던진 의식이 다음 목적지의 몸을 입기 전에 잠시 머무는 영적인 필수 대기실인 셈이지.</text:span><text:span/></text:p>
      <text:p text:style-name="P641"><text:span text:style-name="T1073">⚖️ 무간업을 지은 자에 대한 해묵은 오해</text:span><text:span/></text:p>
      <text:p text:style-name="P642"><text:span text:style-name="T1074">일부 사람들은 부모를 해치거나 교단을 분열시키는 등 아주 무거운 죄인 무간업을 지은 유정들은 바르도를 거치지 않고 곧장 지옥으로 떨어진다고 주장하기도 해. 악업의 에너지가 너무나 강력해서 중간 단계를 모두 건너뛰고 다이렉트로 추락한다는 논리인데, 쫑카빠 대사는 이것이 잘못된 생각임을 명확히 지적하고 있어. 아무리 무거운 물체라도 위에서 아래로 떨어질 때는 중간의 허공을 순간이동으로 건너뛸 수 없고 반드시 모든 공간을 지나쳐야 하니까 말이야.</text:span><text:span/></text:p>
      <text:p text:style-name="P643"><text:span text:style-name="T1075">📜 람림첸모가 정립한 영적 시스템의 법칙</text:span><text:span/></text:p>
      <text:p text:style-name="P644"><text:span text:style-name="T1076">위대한 스승 쫑카빠는 자신의 저서인 람림첸모를 통해 아무리 무거운 악업을 지은 중생이라도 영적 법칙의 예외가 될 수는 없다고 확언했어. 시속 300킬로미터로 폭주하는 초고속 열차라 할지라도, 출발역에서 종착역까지 가기 위해서는 선로 위의 모든 중간 지점을 아주 짧은 찰나일지언정 반드시 밟고 지나가야 하는 법이거든. 악업이 중해서 바르도에 머무는 시간이 아주 짧을 수는 있어도, 영적 시스템의 기본 정리가 무너져서 단계 자체가 통째로 삭제되는 일은 결코 일어</text:span><text:span text:style-name="T1077">나지 않아.</text:span><text:span/></text:p>
      <text:p text:style-name="P645"><text:span text:style-name="T1078">📝 핵심 요약</text:span><text:span/></text:p>
      <text:list text:style-name="WWNum33" text:continue-numbering="true">
        <text:list-item>
          <text:p text:style-name="P646"><text:span text:style-name="T1079">욕계와 색계라는 차원에 환생하는 모든 유정은 예외 없이 중간 상태인 바르도를 거쳐야 함.</text:span><text:span/></text:p>
        </text:list-item>
        <text:list-item>
          <text:p text:style-name="P647"><text:span text:style-name="T1080">가장 무거운 죄인 무간업을 지은 중생은 바르도를 거치지 않는다는 기존의 주장은 잘못된 오해임.</text:span><text:span/></text:p>
        </text:list-item>
        <text:list-item>
          <text:p text:style-name="P648"><text:span text:style-name="T1081">쫑카빠 대사는 저서 람림첸모를 통해 아무리 강력한 업력이라도 영적 도정의 단계를 건너뛸 수 없음을 밝힘.</text:span><text:span/></text:p>
        </text:list-item>
        <text:list-item>
          <text:p text:style-name="P649"><text:span text:style-name="T1082">초고속 열차가 중간 선로를 반드시 지나치듯, 아주 짧은 순간일지라도 바르도의 단계를 통과하게 됨.</text:span><text:span/></text:p>
        </text:list-item>
      </text:list>
      <text:p text:style-name="P650"><text:span text:style-name="T1083"><text:soft-page-break/></text:span><text:span text:style-name="T1084"/><text:span text:style-name="T1085"/></text:p>
      <text:p text:style-name="P651"><text:span text:style-name="T1086">[🟢 Online Mode | 26.06.05_15:20:15]</text:span><text:span/></text:p>
      <text:p text:style-name="P652"><text:span text:style-name="T1087">102. 형상을 초월한 무색계로의 직행과 바르도의 생략</text:span><text:span/></text:p>
      <text:p text:style-name="P653"><text:span text:style-name="T1088">🔑 핵심 키워드: 무색계, 사명온, 무색정, 죽음의 정광명, 바르도 생략</text:span><text:span/></text:p>
      <text:p text:style-name="P654"><text:span text:style-name="T1089">✈️ 환승 없이 목적지로 직행하는 다이렉트 비행</text:span><text:span/></text:p>
      <text:p text:style-name="P655"><text:span text:style-name="T1090">정신 세계의 가장 높은 영역인 무색계에 태어나는 영혼들은 아주 독특한 경로를 거치게 돼. 보통은 죽은 뒤에 다음 몸을 받기 전까지 바르도라는 중간 대기실을 거쳐야 하지만, 무색계로 가는 존재들은 이 대기실을 완전히 생략하고 패스하지. 이것은 마치 복잡한 허브 공항에서 갈아탈 필요 없이 목적지까지 한 번에 날아가는 초고속 직항 비행기를 타는 것과 같아. 번거로운 중간 과정이 모두 사라지고 죽음의 순간에서 다음 세계로 곧장 도약하는 아주 특별한 이동 방식이지</text:span><text:span text:style-name="T1091">.</text:span><text:span/></text:p>
      <text:p text:style-name="P656"><text:span text:style-name="T1092">💾 신체라는 하드웨어를 벗어던진 순수 소프트웨어</text:span><text:span/></text:p>
      <text:p text:style-name="P657"><text:span text:style-name="T1093">무색계는 이름 그대로 물질적인 형상이나 몸이 전혀 존재하지 않는 순수한 정신만의 세계야. 그래서 이 세계에 태어날 때는 땅이나 물 같은 물질적 요소 대신 오직 느낌과 헤아림, 의식 등의 정신적 요소들인 사명온만을 성취하게 되지. 컴퓨터로 비유하자면 모니터나 본체 같은 무거운 하드웨어 장치를 모두 폐기하고, 오직 가상 공간에서 돌아가는 순수한 프로그램 소프트웨어만 남겨서 실행하는 것과 똑같아. 내가 임종하는 바로 그 자리에서 물리적 형태를 벗어던지고 순수한</text:span><text:span text:style-name="T1094"> 의식의 데이터로 전환되는 현상이야.</text:span><text:span/></text:p>
      <text:p text:style-name="P658"><text:span text:style-name="T1095">🧘 죽음의 깊은 바다에서 깨어나는 명상의 힘</text:span><text:span/></text:p>
      <text:p text:style-name="P659"><text:span text:style-name="T1096">이 놀라운 직행이 가능한 이유는 무색계에 태어날 유정이 죽음의 정광명 상태에서 무색정이라는 깊은 명상의 고요함을 곧바로 실현하기 때문이야. 거친 호흡과 생각이 다 멈추고 가장 미세한 의식의 빛만 남았을 때, 그 빛의 한가운데서 무색계의 명상 상태를 그대로 가동하는 거지. 깊은 바닷속 가장 고요한 심해로 잠수함이 내려앉듯, 의식의 가장 깊은 곳에서 흔들림 없는 고도의 정신 집중을 유지하며 다음 차원으로 부드럽게 연결되는 과정이란다.</text:span><text:span/></text:p>
      <text:p text:style-name="P660"><text:span text:style-name="T1097">🛑 거꾸로 돌지 않는 완벽한 일방통행 노선</text:span><text:span/></text:p>
      <text:p text:style-name="P661"><text:span text:style-name="T1098">일반적인 죽음에서는 정광명에 도달했다가 다시 의식이 거꾸로 깨어나면서 정광명에 가까운 마음인 근득이 발생하고, 이것이 결국 바르도의 마음으로 이어지게 돼. 하지만 무색계로 가는 여정에서는 이 되돌아오는 역과정이 전혀 일어나지 않아. 되돌아오는 마음 자체가 곧 바르도 세계의 시작을 의미하기 때문이지. 무색계 유정은 정광명의 종착역에 도착한 뒤 뒤돌아보지 않고 곧장 하늘 위로 올라가기 때문에, 바르도로 빠지는 샛길 자체가 원천적으로 차단되는 일방통행로를 걷는</text:span><text:span text:style-name="T1099"> 셈이야.</text:span><text:span/></text:p>
      <text:p text:style-name="P662"><text:span text:style-name="T1100">📝 핵심 요약</text:span><text:span/></text:p>
      <text:list text:style-name="WWNum34" text:continue-numbering="true">
        <text:list-item>
          <text:p text:style-name="P663"><text:span text:style-name="T1101">무색계에 태어나는 경우에는 중간 대기 상태인 바르도를 거치지 않고 직행한다.</text:span><text:span/></text:p>
        </text:list-item>
        <text:list-item>
          <text:p text:style-name="P664"><text:span text:style-name="T1102">임종하는 장소에서 물질적 육체 없이 정신적 요소인 사명온을 바로 성취한다.</text:span><text:span/></text:p>
        </text:list-item>
        <text:list-item>
          <text:p text:style-name="P665"><text:span text:style-name="T1103">죽음의 정광명 상태에서 무색정이라는 깊은 명상을 곧바로 실현하여 다음 세계로 연결된다.</text:span><text:span/></text:p>
        </text:list-item>
        <text:list-item>
          <text:p text:style-name="P666"><text:span text:style-name="T1104">정광명에서 역으로 일어나는 마음인 근득이 발생하지 않아 바르도의 진입이 생략된다.</text:span><text:span/></text:p>
        </text:list-item>
      </text:list>
      <text:p text:style-name="P667"><text:span text:style-name="T1105"><text:soft-page-break/></text:span><text:span text:style-name="T1106"/><text:span text:style-name="T1107"/></text:p>
      <text:p text:style-name="P668"><text:span text:style-name="T1108">103. 무색계의 공간적 초월과 삼계의 비밀</text:span><text:span/></text:p>
      <text:p text:style-name="P669"><text:span text:style-name="T1109">🔑 핵심 키워드: 무색계, 욕계, 색계, 공간적 비국소성, 순수 의식</text:span><text:span/></text:p>
      <text:p text:style-name="P670"><text:span text:style-name="T1110">🌌 무색계의 정의와 장소에 대한 오해</text:span><text:span/></text:p>
      <text:p text:style-name="P671"><text:span text:style-name="T1111">무색계라는 말을 들으면 흔히 욕계나 색계보다 훨씬 더 높은 곳, 우주의 저 멀리 어딘가에 있는 특별한 신비의 공간을 떠올리기 쉬워. 하지만 무색계는 우리가 발을 딛고 있는 욕계나 아름다운 물질로 가득한 색계로부터 저 멀리 떨어져 독립된 물리적 장소에 존재하는 게 아니란다. 이것은 마치 컴퓨터 안에 설치된 무형의 소프트웨어나 운영체제가 컴퓨터 하드웨어와 물리적으로 전혀 다른 먼 곳에 떨어져 존재하지 않는 것과 아주 비슷해. 형체와 부피가 없는 정신적인 세계</text:span><text:span text:style-name="T1112">이기 때문에, 특정한 물리적 좌표나 위치를 지정해서 설명할 수 없는 차원이지.</text:span><text:span/></text:p>
      <text:p text:style-name="P672"><text:span text:style-name="T1113">📻 욕계·색계와의 중첩과 공존</text:span><text:span/></text:p>
      <text:p text:style-name="P673"><text:span text:style-name="T1114">그렇다면 무색계는 어디에 있는 걸까? 무색계는 지금 우리가 숨 쉬고 있는 이 공간과 완벽하게 중첩되어 공존하고 있어. 눈에 보이지는 않지만 지금 이 순간에도 우리 방 안을 가득 채우고 있는 수많은 라디오 전파나 와이파이 신호를 상상해 보면 이해하기 쉬울 거야. 라디오 전파는 방이라는 물리적 공간 안에 함께 존재하지만, 물질적인 벽에 부딪히거나 갇히지 않고 자신만의 주파수로 흐르고 있잖아. 이처럼 무색계는 공간을 따로 차지하지 않으면서도 고도의 정신적 주파</text:span><text:span text:style-name="T1115">수 형태로 이 세계와 늘 함께 머물고 있는 셈이지.</text:span><text:span/></text:p>
      <text:p text:style-name="P674"><text:span text:style-name="T1116">🛌 공간이 아닌 의식 차원의 도약</text:span><text:span/></text:p>
      <text:p text:style-name="P675"><text:span text:style-name="T1117">결국 무색계라는 것은 물리적인 이동을 통해 도달하는 목적지가 아니라, 마음이 도달하는 지극히 높은 의식의 상태를 뜻해. 우리가 침대에 가만히 누워 눈을 감고 깊은 명상이나 꿈속으로 빠져들 때, 몸은 방 안에 그대로 있지만 정신은 시간과 공간의 제약을 완전히 벗어나 무한한 상상의 세계를 날아다니는 경험을 하곤 하잖아. 이처럼 물질적인 육체의 감각과 형태에 대한 모든 집착을 완벽하게 내려놓았을 때, 우리 의식이 도달하게 되는 가장 순수하고 미세한 마음의 영역</text:span><text:span text:style-name="T1118">이 바로 무색계의 본질이란다.</text:span><text:span/></text:p>
      <text:p text:style-name="P676"><text:span text:style-name="T1119">🕊️ 물질적 구속을 벗어난 순수 존재</text:span><text:span/></text:p>
      <text:p text:style-name="P677"><text:span text:style-name="T1120">따라서 불교에서 말하는 삼계, 즉 욕계와 색계, 무색계는 수직으로 높이 쌓아 올린 아파트 층수 같은 개념이 전혀 아니야. 그것은 존재들이 지닌 의식의 맑고 탁한 정도, 그리고 물질에 얼마나 얽매여 있느냐에 따라 구분되는 정신적 스펙트럼일 뿐이지. 무색계는 장소의 제약을 완전히 초월해 있기 때문에, 욕계의 거친 욕망과 색계의 미세한 물질적 형상마저 모두 녹아내린 바로 그 자리에 순수한 정신적 에너지 자체로 영원히 흐르고 있는 고요한 세계라고 볼 수 있어.</text:span><text:span/></text:p>
      <text:p text:style-name="P678"><text:span text:style-name="T1121">📝 핵심 요약</text:span><text:span/></text:p>
      <text:list text:style-name="WWNum35" text:continue-numbering="true">
        <text:list-item>
          <text:p text:style-name="P679"><text:span text:style-name="T1122">무색계는 욕계나 색계와 분리된 별도의 물리적 장소나 공간에 존재하는 것이 아니다.</text:span><text:span/></text:p>
        </text:list-item>
        <text:list-item>
          <text:p text:style-name="P680"><text:span text:style-name="T1123">컴퓨터 소프트웨어나 라디오 전파처럼 무색계는 물질적 공간 안에 형태 없이 중첩되어 존재한다.</text:span><text:span/></text:p>
        </text:list-item>
        <text:list-item>
          <text:p text:style-name="P681"><text:span text:style-name="T1124">물리적인 공간 이동이 아니라 물질과 형상에 대한 집착을 완전히 내려놓은 순수한 의식 상태를 뜻한다.</text:span><text:span/></text:p>
        </text:list-item>
        <text:list-item>
          <text:p text:style-name="P682"><text:span text:style-name="T1125">삼계는 수직적인 공간의 층수가 아니라 물질적 구속의 정도에 따른 의식의 스펙트럼이다.</text:span><text:span/></text:p>
        </text:list-item>
      </text:list>
      <text:p text:style-name="P683"><text:span text:style-name="T1126"><text:soft-page-break/></text:span><text:span text:style-name="T1127"/><text:span text:style-name="T1128"/></text:p>
      <text:p text:style-name="P684"><text:span text:style-name="T1129">104. 특별한 바르도와 최후유 보살의 하생</text:span><text:span/></text:p>
      <text:p text:style-name="P685"><text:span text:style-name="T1130">🔑 핵심 키워드: 최후유 보살, 도솔천 하생, 동자의 상호, 십억 사대주 광명</text:span><text:span/></text:p>
      <text:p text:style-name="P686"><text:span text:style-name="T1131">🌟 특별한 환승객, 최후유 보살의 등장</text:span><text:span/></text:p>
      <text:p text:style-name="P687"><text:span text:style-name="T1132">이제 완전히 차원이 다른 특수한 바르도 존재에 대해 알아볼 차례야. 해탈을 성취하기 직전, 딱 한 번의 삶만 남겨둔 위대한 일래보살인 최후유 보살이 바로 그 주인공이지. 이들은 도솔천이라는 천상 세계에서 머물다가 중생을 구제하기 위해 어머니의 자궁으로 들어가는 아주 성스러운 여정을 밟게 돼. 마치 모든 비행 단계와 우주 비행 훈련을 완벽히 마치고 마지막 임무를 완수하기 위해 지구로 내려오는 최고의 우주비행사와 같은 특별한 존재라고 생각하면 이해하기 쉬울 </text:span><text:span text:style-name="T1133">거야.</text:span><text:span/></text:p>
      <text:p text:style-name="P688"><text:span text:style-name="T1134">👦 영원한 청춘, 동자의 상호와 완벽한 형상</text:span><text:span/></text:p>
      <text:p text:style-name="P689"><text:span text:style-name="T1135">이 특별한 보살의 바르도 영체는 일반적인 중생의 흐릿한 빛깔과 달리 완벽한 아름다움을 갖추고 있어. 온갖 상호를 고스란히 지닌 아름다운 동자의 모습을 하고 있지. 시들지 않는 꽃처럼 늘 생기와 에너지가 넘쳐나는 청춘의 아바타를 입고 있는 셈이야.</text:span><text:span/></text:p>
      <text:p text:style-name="P690"><text:span text:style-name="T1136">신체적 특징: 부처와 보살의 거룩한 상호를 모두 갖춤</text:span><text:span/></text:p>
      <text:p text:style-name="P691"><text:span text:style-name="T1137">에너지 상태: 영원히 늙거나 지치지 않는 순수한 청년의 생명력</text:span><text:span/></text:p>
      <text:p text:style-name="P692"><text:span text:style-name="T1138">☀️ 온 우주를 깨우는 눈부신 광명의 스케일</text:span><text:span/></text:p>
      <text:p text:style-name="P693"><text:span text:style-name="T1139">이 보살이 움직일 때 내뿜는 빛의 규모는 상상을 초월할 정도로 거대해. 십억 개의 사대주, 즉 우리가 인지할 수 있는 거대한 우주 전체를 단번에 환하게 밝히는 초강력 광명이 영체에서 뿜어져 나오지. 칠흑 같은 우주 공간에 초거대 항성이 태어나 주변의 모든 은하계를 순식간에 대낮처럼 투명하게 비추는 장엄한 스펙터클과 같아.</text:span><text:span/></text:p>
      <table:table table:style-name="ta7">
        <table:table-columns>
          <table:table-column table:style-name="co16"/>
          <table:table-column table:style-name="co17"/>
          <table:table-column table:style-name="co18"/>
        </table:table-columns>
        <table:table-row table:style-name="ro32" table:default-cell-style-name="ce82">
          <table:table-cell table:style-name="ce83">
            <text:p text:style-name="P694"><text:span text:style-name="T1140">광명의 범위</text:span><text:span/></text:p>
          </table:table-cell>
          <table:table-cell table:style-name="ce84">
            <text:p text:style-name="P695"><text:span text:style-name="T1141">비유적 차원</text:span><text:span/></text:p>
          </table:table-cell>
          <table:table-cell table:style-name="ce85">
            <text:p text:style-name="P696"><text:span text:style-name="T1142">지각적 효과</text:span><text:span/></text:p>
          </table:table-cell>
        </table:table-row>
        <table:table-row table:style-name="ro33" table:default-cell-style-name="ce82">
          <table:table-cell table:style-name="ce86">
            <text:p text:style-name="P697"><text:span text:style-name="T1143">십억 사대주</text:span><text:span/></text:p>
          </table:table-cell>
          <table:table-cell table:style-name="ce87">
            <text:p text:style-name="P698"><text:span text:style-name="T1144">우주적 스케일의 초강력 서치라이트</text:span><text:span/></text:p>
          </table:table-cell>
          <table:table-cell table:style-name="ce88">
            <text:p text:style-name="P699"><text:span text:style-name="T1145">온 누리의 어둠과 무지를 단번에 몰아냄</text:span><text:span/></text:p>
          </table:table-cell>
        </table:table-row>
      </table:table>
      <text:p text:style-name="P700"><text:span text:style-name="T1146">📜 위대한 스승들이 증명하는 밀교의 전승</text:span><text:span/></text:p>
      <text:p text:style-name="P701"><text:span text:style-name="T1147">이 신비로운 이야기는 상상 속의 신화가 아니라 유서 깊은 불교 교학 문헌들이 정밀하게 뒷받침하는 진실이야. 세친 보살의 구사론석과 밀교의 위대한 성자인 나가보디의 밀집성취안립차제에서 이 거룩한 하생 과정을 명확하게 증명하고 있지. 건축물의 도면을 더블 체크하듯 위대한 논서들이 이 특수한 바르도의 실체를 이중으로 확인해 주는 맥락이야.</text:span><text:span/></text:p>
      <text:p text:style-name="P702"><text:span text:style-name="T1148">📝 핵심 요약</text:span><text:span/></text:p>
      <text:list text:style-name="WWNum36" text:continue-numbering="true">
        <text:list-item>
          <text:p text:style-name="P703"><text:span text:style-name="T1149">최후유 보살은 깨달음 직전 단 한 번의 생만 남겨두고 도솔천에서 어머니의 자궁으로 향하는 특별한 바르도 존재야.</text:span><text:span/></text:p>
        </text:list-item>
        <text:list-item>
          <text:p text:style-name="P704"><text:span text:style-name="T1150">일반 중생과 달리 부처의 거룩한 상호를 모두 갖춘 아름답고 청정한 동자의 형상을 띠고 있어.</text:span><text:span/></text:p>
        </text:list-item>
        <text:list-item>
          <text:p text:style-name="P705"><text:span text:style-name="T1151">영체에서 뿜어져 나오는 빛은 십억 사대주라는 광대한 우주 전체를 대낮처럼 투명하게 밝히는 스케일을 자랑해.</text:span><text:span/></text:p>
        </text:list-item>
        <text:list-item>
          <text:p text:style-name="P706"><text:span text:style-name="T1152">이 장엄한 하생의 진실은 구사론석과 나가보디의 밀집성취안립차제라는 확고한 문헌적 전승을 통해 증명되고 있어.</text:span><text:span/></text:p>
        </text:list-item>
      </text:list>
      <text:p text:style-name="P707"><text:span text:style-name="T1153"><text:soft-page-break/></text:span><text:span text:style-name="T1154"/><text:span text:style-name="T1155"/></text:p>
      <text:p text:style-name="P708"><text:span text:style-name="T1156">[🟢 Online Mode | 26.06.05_15:30:44]</text:span><text:span/></text:p>
      <text:p text:style-name="P709"><text:span text:style-name="T1157">105. 하얀 코끼리 꿈과 바르도의 진실</text:span><text:span/></text:p>
      <text:p text:style-name="P710"><text:span text:style-name="T1158">🔑 핵심 키워드: 육아백상 입태, 마야부인의 꿈, 권위 있는 논전, 대승과 소승의 관점</text:span><text:span/></text:p>
      <text:p text:style-name="P711"><text:span text:style-name="T1159">🐘 백상 입태의 의문과 불일치</text:span><text:span/></text:p>
      <text:p text:style-name="P712"><text:span text:style-name="T1160">석가모니 보살이 어머니 마야부인의 자궁에 들어갈 때 여섯 개의 어금니를 가진 하얀 코끼리의 모습을 하고 있었다는 유명한 가르침이 있어. 그런데 앞서 우리가 살펴본 원칙대로라면 인간으로 태어날 존재는 바르도 상태에서도 인간의 형상을 하고 있어야 하잖아. 동물의 왕인 코끼리의 모습을 했다는 이야기는 일반적인 바르도의 법칙과 정면으로 부딪히는 것처럼 보여서 커다란 의문이 생길 수밖에 없지.</text:span><text:span/></text:p>
      <text:p text:style-name="P713"><text:span text:style-name="T1161">💤 어머니의 서사를 반영한 맞춤형 방편</text:span><text:span/></text:p>
      <text:p text:style-name="P714"><text:span text:style-name="T1162">이 모순을 해결하는 첫 번째 열쇠는 그것이 마야부인이 꾼 특별한 꿈의 내용을 그대로 맞추어 설명한 방편이라는 점이야. 비유하자면 태어날 아기를 축복하기 위해 부모가 가장 좋아하는 아름다운 상징물이나 태몽의 이미지를 그대로 그려 넣은 맞춤형 축하 카드를 선물하는 것과 비슷해. 실제로 코끼리라는 동물의 몸으로 들어간 것이 아니라, 태중의 아기가 가질 성스럽고 거대한 힘을 어머니의 무의식 속에 가장 친숙한 최고의 상징으로 보여준 교학적 배려인 셈이지.</text:span><text:span/></text:p>
      <text:p text:style-name="P715"><text:span text:style-name="T1163">⚖️ 논전의 원칙과 형상의 정체성</text:span><text:span/></text:p>
      <text:p text:style-name="P716"><text:span text:style-name="T1164">인간 세상에 태어날 바르도 유정이 실제 동물의 모습을 취한다는 주장은 준거가 되는 수많은 정통 논전들의 가르침과 완전히 어긋나는 일이야.</text:span><text:span/></text:p>
      <text:list text:style-name="WWNum37" text:continue-numbering="true">
        <text:list-item>
          <text:p text:style-name="P717"><text:span text:style-name="T1165">바르도 형상의 법칙: 미래에 태어날 세계의 신체 윤곽을 철저하게 따름</text:span><text:span/></text:p>
        </text:list-item>
        <text:list-item>
          <text:p text:style-name="P718"><text:span text:style-name="T1166">축생 형상의 모순: 인간으로 올 존재가 축생의 형태를 가지는 것은 원천적으로 불가능함</text:span><text:span/></text:p>
        </text:list-item>
        <text:list-item>
          <text:p text:style-name="P719"><text:span text:style-name="T1167">상징적 해석의 필요성: 따라서 코끼리 형상은 문자 그대로의 물리적 사실이 아닌 상징으로 읽어야 함</text:span><text:span/></text:p>
        </text:list-item>
        <text:list-item>
          <text:p text:style-name="P720"><text:span text:style-name="T1168">마치 컴퓨터 프로그램에서 인간이라는 확장자를 가진 파일이 갑자기 동물용 프로그램으로 오인되어 실행될 수 없는 것처럼, 영적인 에너지의 법칙도 자신이 갈 목적지의 형태를 왜곡하지 않고 정확하게 유지하는 법이거든.</text:span><text:span/></text:p>
        </text:list-item>
      </text:list>
      <text:p text:style-name="P721"><text:span text:style-name="T1169">🗺️ 대승과 소승이 바라보는 두 가지 시선</text:span><text:span/></text:p>
      <text:p text:style-name="P722"><text:span text:style-name="T1170">이 신비로운 사건을 해석하는 방식은 불교의 두 거대한 흐름인 소승과 대승에 따라 뚜렷하게 나뉘어.</text:span><text:span/></text:p>
      <table:table table:style-name="ta8">
        <table:table-columns>
          <table:table-column table:style-name="co19"/>
          <table:table-column table:style-name="co20"/>
          <table:table-column table:style-name="co21"/>
        </table:table-columns>
        <table:table-row table:style-name="ro34" table:default-cell-style-name="ce89">
          <table:table-cell table:style-name="ce90">
            <text:p text:style-name="P723"><text:span text:style-name="T1171">불교 학파</text:span><text:span/></text:p>
          </table:table-cell>
          <table:table-cell table:style-name="ce91">
            <text:p text:style-name="P724"><text:span text:style-name="T1172">사건을 바라보는 관점</text:span><text:span/></text:p>
          </table:table-cell>
          <table:table-cell table:style-name="ce92">
            <text:p text:style-name="P725"><text:span text:style-name="T1173">직관적 비유</text:span><text:span/></text:p>
          </table:table-cell>
        </table:table-row>
        <table:table-row table:style-name="ro35" table:default-cell-style-name="ce89">
          <table:table-cell table:style-name="ce93">
            <text:p text:style-name="P726"><text:span text:style-name="T1174">소승의 교설</text:span><text:span/></text:p>
          </table:table-cell>
          <table:table-cell table:style-name="ce94">
            <text:p text:style-name="P727"><text:span text:style-name="T1175">역사적 사실로 받아들이며 가르침의 문자를 그대로 인정함</text:span><text:span/></text:p>
          </table:table-cell>
          <table:table-cell table:style-name="ce95">
            <text:p text:style-name="P728"><text:span text:style-name="T1176">인물의 일대기를 기록한 사실적인 역사 다큐멘터리</text:span><text:span/></text:p>
          </table:table-cell>
        </table:table-row>
        <table:table-row table:style-name="ro36" table:default-cell-style-name="ce89">
          <table:table-cell table:style-name="ce96">
            <text:p text:style-name="P729"><text:span text:style-name="T1177">대승의 교설</text:span><text:span/></text:p>
          </table:table-cell>
          <table:table-cell table:style-name="ce97">
            <text:p text:style-name="P730"><text:span text:style-name="T1178">이미 성불한 존재가 중생을 구제하기 위해 연출한 연극으로 봄</text:span><text:span/></text:p>
          </table:table-cell>
          <table:table-cell table:style-name="ce98">
            <text:p text:style-name="P731"><text:span text:style-name="T1179">거장 감독이 심오한 메시지를 전하기 위해 연출한 예술 영화</text:span><text:span/></text:p>
          </table:table-cell>
        </table:table-row>
      </table:table>
      <text:p text:style-name="P732"><text:span text:style-name="T1180">대승의 관점에서는 보살이 이미 오래전에 깨달음을 얻었기 때문에 자궁에 갇히거나 동물의 형상을 취할 이유가 전혀 없다고 봐. 단지 세상 사람들에게 보살의 출현을 알리고 감동을 주기 위해 거룩한 모양을 빌려 무대를 연출한 것뿐이라고 명쾌하게 정리하지.</text:span><text:span/></text:p>
      <text:p text:style-name="P733"><text:span text:style-name="T1181">📝 핵심 요약</text:span><text:span/></text:p>
      <text:list text:style-name="WWNum37" text:continue-numbering="true">
        <text:list-item>
          <text:p text:style-name="P734"><text:span text:style-name="T1182">보살이 하얀 코끼리 모습으로 입태했다는 이야기는 바르도의 일반 원칙과 모순되어 보임.</text:span><text:span/></text:p>
        </text:list-item>
        <text:list-item>
          <text:p text:style-name="P735"><text:span text:style-name="T1183">이는 실제 축생의 몸이 아니라 마야부인의 태몽과 상응하도록 맞추어 설한 상징적 방편임.</text:span><text:span/></text:p>
        </text:list-item>
        <text:list-item>
          <text:p text:style-name="P736"><text:span text:style-name="T1184">인간으로 환생할 존재가 동물의 형상을 취하는 것은 정통 논전의 법칙에 원천적으로 불가능함.</text:span><text:span/></text:p>
        </text:list-item>
        <text:list-item>
          <text:p text:style-name="P737"><text:span text:style-name="T1185">소승은 이를 문자 그대로 받아들이는 반면, 대승은 중생 구제를 위한 거룩한 연출로 해석함.</text:span><text:span/></text:p>
        </text:list-item>
      </text:list>
      <text:p text:style-name="P738"><text:span text:style-name="T1186"><text:soft-page-break/></text:span><text:span text:style-name="T1187"/><text:span text:style-name="T1188"/></text:p>
      <text:p text:style-name="P739"><text:span text:style-name="T1189">[🟢 Online Mode | 26.06.05_15:20:52]</text:span><text:span/></text:p>
      <text:p text:style-name="P740"><text:span text:style-name="T1190">106. 바르도 구조의 마스터와 깨달음의 설계도</text:span><text:span/></text:p>
      <text:p text:style-name="P741"><text:span text:style-name="T1191">🔑 핵심 키워드: 바르도 구조, 생기차제, 원만차제, 보신 전환, 환신의 정화</text:span><text:span/></text:p>
      <text:p text:style-name="P742"><text:span text:style-name="T1192">🗺️ 바르도라는 미지의 세계를 위한 정밀 지도</text:span><text:span/></text:p>
      <text:p text:style-name="P743"><text:span text:style-name="T1193">바르도의 복잡한 구조를 완벽하게 이해하는 것은, 마치 아무도 가본 적 없는 깊은 정글을 탐험하기 전에 가장 정밀한 위성 지도를 손에 넣는 것과 같아. 티베트 수행자들에게 이 구조를 숙지하는 일은 단순한 이론 공부가 아니라, 생사의 갈림길에서 길을 잃지 않기 위한 필수 생존 훈련이지. 지도의 등고선 하나하나를 외우듯 바르도의 단계를 세밀하게 파악해야만, 거대한 의식의 폭풍 속에서도 흔들리지 않고 중심을 잡을 수 있단다.</text:span><text:span/></text:p>
      <text:p text:style-name="P744"><text:span text:style-name="T1194">🎭 보신으로 변신하는 의식의 연극 연습</text:span><text:span/></text:p>
      <text:p text:style-name="P745"><text:span text:style-name="T1195">무상유가딴뜨라의 첫 번째 수행 단계인 생기차제에서는, 이 바르도라는 중간 상태를 부처의 고귀한 몸인 보신으로 탈바꿈시키는 위대한 연습을 해. 이것은 배우가 무대 뒤 대기실에서 대본을 보며 다음 장면에 입을 화려한 왕의 의상을 완벽하게 준비하는 과정과 비슷하지. 바르도의 텅 빈 에너지를 그대로 방치하는 것이 아니라, 깨달음의 빛을 발하는 신성한 존재로 리모델링하는 리허설을 미리 치르는 셈이야.</text:span><text:span/></text:p>
      <text:p text:style-name="P746"><text:span text:style-name="T1196">💎 순수한 환신을 빚어내는 정화의 용광로</text:span><text:span/></text:p>
      <text:p text:style-name="P747"><text:span text:style-name="T1197">그다음 단계인 원만차제에서는 바르도를 청정환신과 부정환신이라는 미세한 에너지의 몸으로 정화하는 작업을 진행하게 돼. 우리 마음의 먼지와 얼룩을 완전히 씻어내어 가공되지 않은 원석을 눈부신 다이아몬드로 제련하는 거대한 용광로와 같아. 바르도라는 가공되지 않은 거친 의식의 재료를 바탕 삼아, 가장 순수하고 투명한 영적인 몸을 빚어내는 정밀한 연금술의 과정인 거지.</text:span><text:span/></text:p>
      <text:p text:style-name="P748"><text:span text:style-name="T1198">🔑 생사의 마침표를 깨달음의 시작으로 바꾸는 열쇠</text:span><text:span/></text:p>
      <text:p text:style-name="P749"><text:span text:style-name="T1199">결국 바르도의 구조를 자세히 아는 것이 무엇보다 중요하다고 강조하는 이유는, 이 지식이 죽음 이후의 혼란을 완벽한 깨달음으로 뒤바꿀 유일한 마스터키이기 때문이야. 평소에 이 설계도를 머리와 가슴에 철저히 새겨두어야만, 막상 실전이 닥쳤을 때 당황하지 않고 깨달음의 스위치를 정확히 켤 수 있어. 어려운 개념을 배우는 과정은 네 영적 내비게이션을 더욱 정교하게 업그레이드하는 멋진 시간이야.</text:span><text:span/></text:p>
      <text:p text:style-name="P750"><text:span text:style-name="T1200">📝 핵심 요약</text:span><text:span/></text:p>
      <text:list text:style-name="WWNum38" text:continue-numbering="true">
        <text:list-item>
          <text:p text:style-name="P751"><text:span text:style-name="T1201">바르도의 구조를 자세히 아는 것은 생사의 갈림길에서 길을 잃지 않기 위한 필수 지도를 얻는 것과 같다.</text:span><text:span/></text:p>
        </text:list-item>
        <text:list-item>
          <text:p text:style-name="P752"><text:span text:style-name="T1202">생기차제 단계에서는 바르도의 중간 상태를 부처의 신성한 몸인 보신으로 전환하는 훈련을 한다.</text:span><text:span/></text:p>
        </text:list-item>
        <text:list-item>
          <text:p text:style-name="P753"><text:span text:style-name="T1203">원만차제 단계에서는 바르도를 청정환신과 부정환신이라는 순수한 에너지의 몸으로 정화한다.</text:span><text:span/></text:p>
        </text:list-item>
        <text:list-item>
          <text:p text:style-name="P754"><text:span text:style-name="T1204">이 구조를 숙지하는 것은 죽음의 혼란을 영원한 깨달음으로 바꾸는 결정적인 마스터키가 된다.</text:span><text:span/></text:p>
        </text:list-item>
      </text:list>
      <text:list text:style-name="WWNum1" text:continue-numbering="true">
        <text:list-item>
          <text:p text:style-name="P755"><text:span text:style-name="T1205"/><text:span><text:soft-page-break/></text:span><text:span text:style-name="T1206"/><text:span/></text:p>
        </text:list-item>
      </text:list>
      <text:p text:style-name="P75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00%" style:tab-stop-distance="35.4pt" fo:margin-top="0pt"/>
      <style:text-properties fo:font-family="Arial" style:font-family-asian="Arial" style:font-family-complex="Arial" fo:font-size="11pt" style:font-size-complex="11pt" fo:language="en" style:language-complex="ar" fo:country="US" style:country-complex="SA"/>
    </style:default-style>
    <style:default-style style:family="text">
      <style:text-properties fo:font-family="Arial" style:font-family-asian="Arial" style:font-family-complex="Arial" fo:font-size="11pt" style:font-size-complex="11pt" fo:language="en" style:language-complex="ar" fo:country="US" style:country-complex="SA"/>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64" style:display-name="Heading 1" style:family="paragraph" style:name="139">
      <style:paragraph-properties fo:margin-top="18pt" fo:margin-bottom="4pt"/>
      <style:text-properties fo:color="#0f4761" fo:font-family="Arial" style:font-family-asian="Arial" style:font-family-complex="Arial" fo:font-size="20pt" style:font-size-complex="20pt"/>
    </style:style>
    <style:style style:parent-style-name="664" style:display-name="Heading 2" style:family="paragraph" style:name="140">
      <style:paragraph-properties fo:margin-top="8pt" fo:margin-bottom="4pt"/>
      <style:text-properties fo:color="#0f4761" fo:font-family="Arial" style:font-family-asian="Arial" style:font-family-complex="Arial" fo:font-size="16pt" style:font-size-complex="16pt"/>
    </style:style>
    <style:style style:parent-style-name="664" style:display-name="Heading 3" style:family="paragraph" style:name="141">
      <style:paragraph-properties fo:margin-top="8pt" fo:margin-bottom="4pt"/>
      <style:text-properties fo:color="#0f4761" fo:font-family="Arial" style:font-family-asian="Arial" style:font-family-complex="Arial" fo:font-size="14pt" style:font-size-complex="14pt"/>
    </style:style>
    <style:style style:parent-style-name="664" style:display-name="Heading 4" style:family="paragraph" style:name="142">
      <style:paragraph-properties fo:margin-top="4pt" fo:margin-bottom="2pt"/>
      <style:text-properties fo:color="#0f4761" fo:font-family="Arial" style:font-family-asian="Arial" style:font-family-complex="Arial" fo:font-style="italic"/>
    </style:style>
    <style:style style:parent-style-name="664" style:display-name="Heading 5" style:family="paragraph" style:name="143">
      <style:paragraph-properties fo:margin-top="4pt" fo:margin-bottom="2pt"/>
      <style:text-properties fo:color="#0f4761" fo:font-family="Arial" style:font-family-asian="Arial" style:font-family-complex="Arial"/>
    </style:style>
    <style:style style:parent-style-name="664" style:display-name="Heading 6" style:family="paragraph" style:name="144">
      <style:paragraph-properties fo:margin-top="2pt" fo:margin-bottom="0pt"/>
      <style:text-properties fo:color="#595959" fo:font-family="Arial" style:font-family-asian="Arial" style:font-family-complex="Arial" fo:font-style="italic"/>
    </style:style>
    <style:style style:parent-style-name="664" style:display-name="Heading 7" style:family="paragraph" style:name="145">
      <style:paragraph-properties fo:margin-top="2pt" fo:margin-bottom="0pt"/>
      <style:text-properties fo:color="#595959" fo:font-family="Arial" style:font-family-asian="Arial" style:font-family-complex="Arial"/>
    </style:style>
    <style:style style:parent-style-name="664" style:display-name="Heading 8" style:family="paragraph" style:name="146">
      <style:paragraph-properties fo:margin-bottom="0pt"/>
      <style:text-properties fo:color="#272727" fo:font-family="Arial" style:font-family-asian="Arial" style:font-family-complex="Arial" fo:font-style="italic"/>
    </style:style>
    <style:style style:parent-style-name="664" style:display-name="Heading 9" style:family="paragraph" style:name="147">
      <style:paragraph-properties fo:margin-bottom="0pt"/>
      <style:text-properties fo:color="#272727" fo:font-family="Arial" style:font-family-asian="Arial" style:font-family-complex="Arial" fo:font-style="italic"/>
    </style:style>
    <style:style style:class="default" style:display-name="Default Paragraph Font" style:family="text" style:name="148">
      <style:paragraph-properties fo:line-height="100%" fo:margin-top="0pt"/>
    </style:style>
    <style:style style:parent-style-name="148" style:display-name="Heading 1 Char" style:family="text" style:name="150">
      <style:paragraph-properties/>
      <style:text-properties fo:color="#0f4761" fo:font-family="Arial" style:font-family-asian="Arial" style:font-family-complex="Arial" fo:font-size="20pt" style:font-size-complex="20pt"/>
    </style:style>
    <style:style style:parent-style-name="148" style:display-name="Heading 2 Char" style:family="text" style:name="151">
      <style:paragraph-properties/>
      <style:text-properties fo:color="#0f4761" fo:font-family="Arial" style:font-family-asian="Arial" style:font-family-complex="Arial" fo:font-size="16pt" style:font-size-complex="16pt"/>
    </style:style>
    <style:style style:parent-style-name="148" style:display-name="Heading 3 Char" style:family="text" style:name="152">
      <style:paragraph-properties/>
      <style:text-properties fo:color="#0f4761" fo:font-family="Arial" style:font-family-asian="Arial" style:font-family-complex="Arial" fo:font-size="14pt" style:font-size-complex="14pt"/>
    </style:style>
    <style:style style:parent-style-name="148" style:display-name="Heading 4 Char" style:family="text" style:name="153">
      <style:paragraph-properties/>
      <style:text-properties fo:color="#0f4761" fo:font-family="Arial" style:font-family-asian="Arial" style:font-family-complex="Arial" fo:font-style="italic"/>
    </style:style>
    <style:style style:parent-style-name="148" style:display-name="Heading 5 Char" style:family="text" style:name="154">
      <style:paragraph-properties/>
      <style:text-properties fo:color="#0f4761" fo:font-family="Arial" style:font-family-asian="Arial" style:font-family-complex="Arial"/>
    </style:style>
    <style:style style:parent-style-name="148" style:display-name="Heading 6 Char" style:family="text" style:name="155">
      <style:paragraph-properties/>
      <style:text-properties fo:color="#595959" fo:font-family="Arial" style:font-family-asian="Arial" style:font-family-complex="Arial" fo:font-style="italic"/>
    </style:style>
    <style:style style:parent-style-name="148" style:display-name="Heading 7 Char" style:family="text" style:name="156">
      <style:paragraph-properties/>
      <style:text-properties fo:color="#595959" fo:font-family="Arial" style:font-family-asian="Arial" style:font-family-complex="Arial"/>
    </style:style>
    <style:style style:parent-style-name="148" style:display-name="Heading 8 Char" style:family="text" style:name="157">
      <style:paragraph-properties/>
      <style:text-properties fo:color="#272727" fo:font-family="Arial" style:font-family-asian="Arial" style:font-family-complex="Arial" fo:font-style="italic"/>
    </style:style>
    <style:style style:parent-style-name="148" style:display-name="Heading 9 Char" style:family="text" style:name="158">
      <style:paragraph-properties/>
      <style:text-properties fo:color="#272727" fo:font-family="Arial" style:font-family-asian="Arial" style:font-family-complex="Arial" fo:font-style="italic"/>
    </style:style>
    <style:style style:parent-style-name="664" style:display-name="Title" style:family="paragraph" style:name="159">
      <style:paragraph-properties fo:line-height="100%" fo:margin-bottom="4pt" style:contextual-spacing="true"/>
      <style:text-properties fo:font-family="Arial" style:font-family-asian="Arial" style:font-family-complex="Arial" fo:font-size="28pt" style:font-size-complex="28pt" fo:letter-spacing="-0.5pt"/>
    </style:style>
    <style:style style:parent-style-name="148" style:display-name="Title Char" style:family="text" style:name="160">
      <style:paragraph-properties/>
      <style:text-properties fo:font-family="Arial" style:font-family-asian="Arial" style:font-family-complex="Arial" fo:font-size="28pt" style:font-size-complex="28pt" fo:letter-spacing="-0.5pt"/>
    </style:style>
    <style:style style:parent-style-name="664" style:display-name="Subtitle" style:family="paragraph" style:name="161">
      <style:paragraph-properties/>
      <style:text-properties fo:color="#595959" fo:font-size="14pt" style:font-size-complex="14pt" fo:letter-spacing="0.75pt"/>
    </style:style>
    <style:style style:parent-style-name="148" style:display-name="Subtitle Char" style:family="text" style:name="162">
      <style:paragraph-properties/>
      <style:text-properties fo:color="#595959" fo:font-size="14pt" style:font-size-complex="14pt" fo:letter-spacing="0.75pt"/>
    </style:style>
    <style:style style:parent-style-name="664" style:display-name="Quote" style:family="paragraph" style:name="163">
      <style:paragraph-properties fo:text-align="center" fo:margin-top="8pt"/>
      <style:text-properties fo:color="#404040" fo:font-style="italic"/>
    </style:style>
    <style:style style:parent-style-name="148" style:display-name="Quote Char" style:family="text" style:name="164">
      <style:paragraph-properties/>
      <style:text-properties fo:color="#404040" fo:font-style="italic"/>
    </style:style>
    <style:style style:parent-style-name="148" style:display-name="Intense Emphasis" style:family="text" style:name="166">
      <style:paragraph-properties/>
      <style:text-properties fo:color="#0f4761" fo:font-style="italic"/>
    </style:style>
    <style:style style:parent-style-name="664"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8" style:display-name="Intense Quote Char" style:family="text" style:name="168">
      <style:paragraph-properties/>
      <style:text-properties fo:color="#0f4761" fo:font-style="italic"/>
    </style:style>
    <style:style style:parent-style-name="148" style:display-name="Intense Reference" style:family="text" style:name="169">
      <style:paragraph-properties/>
      <style:text-properties fo:font-variant="small-caps" fo:color="#0f4761" fo:letter-spacing="0.25pt" fo:font-weight="bold"/>
    </style:style>
    <style:style style:parent-style-name="148" style:display-name="Subtle Emphasis" style:family="text" style:name="171">
      <style:paragraph-properties/>
      <style:text-properties fo:color="#404040" fo:font-style="italic"/>
    </style:style>
    <style:style style:parent-style-name="148" style:display-name="Emphasis" style:family="text" style:name="172">
      <style:paragraph-properties/>
      <style:text-properties fo:font-style="italic"/>
    </style:style>
    <style:style style:parent-style-name="148" style:display-name="Strong" style:family="text" style:name="173">
      <style:paragraph-properties/>
      <style:text-properties fo:font-weight="bold"/>
    </style:style>
    <style:style style:parent-style-name="148" style:display-name="Subtle Reference" style:family="text" style:name="174">
      <style:paragraph-properties/>
      <style:text-properties fo:font-variant="small-caps" fo:color="#5a5a5a"/>
    </style:style>
    <style:style style:parent-style-name="148" style:display-name="Book Title" style:family="text" style:name="175">
      <style:paragraph-properties/>
      <style:text-properties fo:letter-spacing="0.25pt" fo:font-style="italic" fo:font-weight="bold"/>
    </style:style>
    <style:style style:parent-style-name="664" style:display-name="Header" style:family="paragraph" style:name="176">
      <style:paragraph-properties fo:line-height="100%" fo:margin-bottom="0pt">
        <style:tab-stops>
          <style:tab-stop style:position="8.545cm" style:type="center"/>
          <style:tab-stop style:position="17.09cm" style:type="right"/>
        </style:tab-stops>
      </style:paragraph-properties>
    </style:style>
    <style:style style:parent-style-name="148" style:display-name="Header Char" style:family="text" style:name="177">
      <style:paragraph-properties/>
    </style:style>
    <style:style style:parent-style-name="664" style:display-name="Footer" style:family="paragraph" style:name="178">
      <style:paragraph-properties fo:line-height="100%" fo:margin-bottom="0pt">
        <style:tab-stops>
          <style:tab-stop style:position="8.545cm" style:type="center"/>
          <style:tab-stop style:position="17.09cm" style:type="right"/>
        </style:tab-stops>
      </style:paragraph-properties>
    </style:style>
    <style:style style:parent-style-name="148" style:display-name="Footer Char" style:family="text" style:name="179">
      <style:paragraph-properties/>
    </style:style>
    <style:style style:parent-style-name="664" style:display-name="Caption" style:family="paragraph" style:name="180">
      <style:paragraph-properties fo:line-height="100%" fo:margin-bottom="10pt"/>
      <style:text-properties fo:color="#0e2841" fo:font-size="9pt" style:font-size-complex="9pt" fo:font-style="italic"/>
    </style:style>
    <style:style style:parent-style-name="664" style:display-name="footnote text" style:family="paragraph" style:name="181">
      <style:paragraph-properties fo:line-height="100%" fo:margin-bottom="0pt"/>
      <style:text-properties fo:font-size="10pt" style:font-size-complex="10pt"/>
    </style:style>
    <style:style style:parent-style-name="148" style:display-name="Footnote Text Char" style:family="text" style:name="182">
      <style:paragraph-properties/>
      <style:text-properties fo:font-size="10pt" style:font-size-complex="10pt"/>
    </style:style>
    <style:style style:parent-style-name="148" style:display-name="footnote reference" style:family="text" style:name="183">
      <style:paragraph-properties/>
      <style:text-properties style:text-position="super 58%"/>
    </style:style>
    <style:style style:parent-style-name="664" style:display-name="endnote text" style:family="paragraph" style:name="184">
      <style:paragraph-properties fo:line-height="100%" fo:margin-bottom="0pt"/>
      <style:text-properties fo:font-size="10pt" style:font-size-complex="10pt"/>
    </style:style>
    <style:style style:parent-style-name="148" style:display-name="Endnote Text Char" style:family="text" style:name="185">
      <style:paragraph-properties/>
      <style:text-properties fo:font-size="10pt" style:font-size-complex="10pt"/>
    </style:style>
    <style:style style:parent-style-name="148" style:display-name="endnote reference" style:family="text" style:name="186">
      <style:paragraph-properties/>
      <style:text-properties style:text-position="super 58%"/>
    </style:style>
    <style:style style:parent-style-name="148" style:display-name="Hyperlink" style:family="text" style:name="18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8"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664" style:display-name="toc 1" style:family="paragraph" style:name="189">
      <style:paragraph-properties fo:margin-bottom="5pt"/>
    </style:style>
    <style:style style:parent-style-name="664" style:display-name="toc 2" style:family="paragraph" style:name="190">
      <style:paragraph-properties fo:margin-left="0.3881cm" fo:margin-bottom="5pt"/>
    </style:style>
    <style:style style:parent-style-name="664" style:display-name="toc 3" style:family="paragraph" style:name="191">
      <style:paragraph-properties fo:margin-left="0.7762cm" fo:margin-bottom="5pt"/>
    </style:style>
    <style:style style:parent-style-name="664" style:display-name="toc 4" style:family="paragraph" style:name="192">
      <style:paragraph-properties fo:margin-left="1.164cm" fo:margin-bottom="5pt"/>
    </style:style>
    <style:style style:parent-style-name="664" style:display-name="toc 5" style:family="paragraph" style:name="193">
      <style:paragraph-properties fo:margin-left="1.552cm" fo:margin-bottom="5pt"/>
    </style:style>
    <style:style style:parent-style-name="664" style:display-name="toc 6" style:family="paragraph" style:name="194">
      <style:paragraph-properties fo:margin-left="1.94cm" fo:margin-bottom="5pt"/>
    </style:style>
    <style:style style:parent-style-name="664" style:display-name="toc 7" style:family="paragraph" style:name="195">
      <style:paragraph-properties fo:margin-left="2.328cm" fo:margin-bottom="5pt"/>
    </style:style>
    <style:style style:parent-style-name="664" style:display-name="toc 8" style:family="paragraph" style:name="196">
      <style:paragraph-properties fo:margin-left="2.717cm" fo:margin-bottom="5pt"/>
    </style:style>
    <style:style style:parent-style-name="664" style:display-name="toc 9" style:family="paragraph" style:name="197">
      <style:paragraph-properties fo:margin-left="3.105cm" fo:margin-bottom="5pt"/>
    </style:style>
    <style:style style:parent-style-name="148" style:display-name="Placeholder Text" style:family="text" style:name="198">
      <style:paragraph-properties/>
      <style:text-properties fo:color="#666666"/>
    </style:style>
    <style:style style:display-name="TOC Heading" style:family="paragraph" style:name="208">
      <style:paragraph-properties/>
    </style:style>
    <style:style style:parent-style-name="664" style:display-name="table of figures" style:family="paragraph" style:name="209">
      <style:paragraph-properties fo:margin-bottom="0pt"/>
    </style:style>
    <style:style style:class="default" style:display-name="Normal" style:family="paragraph" style:name="664">
      <style:paragraph-properties fo:line-height="100%" fo:margin-top="0pt"/>
      <style:text-properties/>
    </style:style>
    <style:style style:parent-style-name="664" style:display-name="No Spacing" style:family="paragraph" style:name="667">
      <style:paragraph-properties fo:line-height="100%" fo:margin-bottom="0pt"/>
    </style:style>
    <style:style style:parent-style-name="664" style:display-name="List Paragraph" style:family="paragraph" style:name="668">
      <style:paragraph-properties fo:margin-left="1.27cm" style:contextual-spacing="true"/>
      <style:text-properties/>
    </style:style>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Symbol" style:font-family-asian="Symbol" style:font-family-complex="Symbo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Symbol" style:font-family-asian="Symbol" style:font-family-complex="Symbo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Symbol" style:font-family-asian="Symbol" style:font-family-complex="Symbo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fo:font-family="Symbol" style:font-family-asian="Symbol" style:font-family-complex="Symbo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Symbol" style:font-family-asian="Symbol" style:font-family-complex="Symbo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Symbol" style:font-family-asian="Symbol" style:font-family-complex="Symbo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fo:font-family="Symbol" style:font-family-asian="Symbol" style:font-family-complex="Symbol"/>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fo:font-family="Symbol" style:font-family-asian="Symbol" style:font-family-complex="Symbol"/>
    </style:style>
    <style:style style:family="text" style:name="T92">
      <style:text-properties fo:font-family="Courier New" style:font-family-asian="Courier New" style:font-family-complex="Courier New"/>
    </style:style>
    <style:style style:family="text" style:name="T93">
      <style:text-properties fo:font-family="Wingdings" style:font-family-asian="Wingdings" style:font-family-complex="Wingdings"/>
    </style:style>
    <style:style style:family="text" style:name="T94">
      <style:text-properties fo:font-family="Symbol" style:font-family-asian="Symbol" style:font-family-complex="Symbol"/>
    </style:style>
    <style:style style:family="text" style:name="T95">
      <style:text-properties fo:font-family="Courier New" style:font-family-asian="Courier New" style:font-family-complex="Courier New"/>
    </style:style>
    <style:style style:family="text" style:name="T96">
      <style:text-properties fo:font-family="Wingdings" style:font-family-asian="Wingdings" style:font-family-complex="Wingdings"/>
    </style:style>
    <style:style style:family="text" style:name="T97">
      <style:text-properties fo:font-family="Symbol" style:font-family-asian="Symbol" style:font-family-complex="Symbol"/>
    </style:style>
    <style:style style:family="text" style:name="T98">
      <style:text-properties fo:font-family="Courier New" style:font-family-asian="Courier New" style:font-family-complex="Courier New"/>
    </style:style>
    <style:style style:family="text" style:name="T99">
      <style:text-properties fo:font-family="Wingdings" style:font-family-asian="Wingdings" style:font-family-complex="Wingdings"/>
    </style:style>
    <style:style style:family="text" style:name="T100">
      <style:text-properties fo:font-family="Symbol" style:font-family-asian="Symbol" style:font-family-complex="Symbol"/>
    </style:style>
    <style:style style:family="text" style:name="T101">
      <style:text-properties fo:font-family="Courier New" style:font-family-asian="Courier New" style:font-family-complex="Courier New"/>
    </style:style>
    <style:style style:family="text" style:name="T102">
      <style:text-properties fo:font-family="Wingdings" style:font-family-asian="Wingdings" style:font-family-complex="Wingdings"/>
    </style:style>
    <style:style style:family="text" style:name="T103">
      <style:text-properties fo:font-family="Symbol" style:font-family-asian="Symbol" style:font-family-complex="Symbol"/>
    </style:style>
    <style:style style:family="text" style:name="T104">
      <style:text-properties fo:font-family="Courier New" style:font-family-asian="Courier New" style:font-family-complex="Courier New"/>
    </style:style>
    <style:style style:family="text" style:name="T105">
      <style:text-properties fo:font-family="Wingdings" style:font-family-asian="Wingdings" style:font-family-complex="Wingdings"/>
    </style:style>
    <style:style style:family="text" style:name="T106">
      <style:text-properties fo:font-family="Symbol" style:font-family-asian="Symbol" style:font-family-complex="Symbol"/>
    </style:style>
    <style:style style:family="text" style:name="T107">
      <style:text-properties fo:font-family="Courier New" style:font-family-asian="Courier New" style:font-family-complex="Courier New"/>
    </style:style>
    <style:style style:family="text" style:name="T108">
      <style:text-properties fo:font-family="Wingdings" style:font-family-asian="Wingdings" style:font-family-complex="Wingdings"/>
    </style:style>
    <style:style style:family="text" style:name="T109">
      <style:text-properties fo:font-family="Symbol" style:font-family-asian="Symbol" style:font-family-complex="Symbo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style:style style:family="text" style:name="T118">
      <style:text-properties fo:font-family="Symbol" style:font-family-asian="Symbol" style:font-family-complex="Symbol"/>
    </style:style>
    <style:style style:family="text" style:name="T119">
      <style:text-properties fo:font-family="Courier New" style:font-family-asian="Courier New" style:font-family-complex="Courier New"/>
    </style:style>
    <style:style style:family="text" style:name="T120">
      <style:text-properties fo:font-family="Wingdings" style:font-family-asian="Wingdings" style:font-family-complex="Wingdings"/>
    </style:style>
    <style:style style:family="text" style:name="T121">
      <style:text-properties fo:font-family="Symbol" style:font-family-asian="Symbol" style:font-family-complex="Symbol"/>
    </style:style>
    <style:style style:family="text" style:name="T122">
      <style:text-properties fo:font-family="Courier New" style:font-family-asian="Courier New" style:font-family-complex="Courier New"/>
    </style:style>
    <style:style style:family="text" style:name="T123">
      <style:text-properties fo:font-family="Wingdings" style:font-family-asian="Wingdings" style:font-family-complex="Wingdings"/>
    </style:style>
    <style:style style:family="text" style:name="T124">
      <style:text-properties fo:font-family="Symbol" style:font-family-asian="Symbol" style:font-family-complex="Symbol"/>
    </style:style>
    <style:style style:family="text" style:name="T125">
      <style:text-properties fo:font-family="Courier New" style:font-family-asian="Courier New" style:font-family-complex="Courier New"/>
    </style:style>
    <style:style style:family="text" style:name="T126">
      <style:text-properties fo:font-family="Wingdings" style:font-family-asian="Wingdings" style:font-family-complex="Wingdings"/>
    </style:style>
    <style:style style:family="text" style:name="T127">
      <style:text-properties fo:font-family="Symbol" style:font-family-asian="Symbol" style:font-family-complex="Symbol"/>
    </style:style>
    <style:style style:family="text" style:name="T128">
      <style:text-properties fo:font-family="Courier New" style:font-family-asian="Courier New" style:font-family-complex="Courier New"/>
    </style:style>
    <style:style style:family="text" style:name="T129">
      <style:text-properties fo:font-family="Wingdings" style:font-family-asian="Wingdings" style:font-family-complex="Wingdings"/>
    </style:style>
    <style:style style:family="text" style:name="T130">
      <style:text-properties fo:font-family="Symbol" style:font-family-asian="Symbol" style:font-family-complex="Symbol"/>
    </style:style>
    <style:style style:family="text" style:name="T131">
      <style:text-properties fo:font-family="Courier New" style:font-family-asian="Courier New" style:font-family-complex="Courier New"/>
    </style:style>
    <style:style style:family="text" style:name="T132">
      <style:text-properties fo:font-family="Wingdings" style:font-family-asian="Wingdings" style:font-family-complex="Wingdings"/>
    </style:style>
    <style:style style:family="text" style:name="T133">
      <style:text-properties fo:font-family="Symbol" style:font-family-asian="Symbol" style:font-family-complex="Symbol"/>
    </style:style>
    <style:style style:family="text" style:name="T134">
      <style:text-properties fo:font-family="Courier New" style:font-family-asian="Courier New" style:font-family-complex="Courier New"/>
    </style:style>
    <style:style style:family="text" style:name="T135">
      <style:text-properties fo:font-family="Wingdings" style:font-family-asian="Wingdings" style:font-family-complex="Wingdings"/>
    </style:style>
    <style:style style:family="text" style:name="T136">
      <style:text-properties fo:font-family="Symbol" style:font-family-asian="Symbol" style:font-family-complex="Symbol"/>
    </style:style>
    <style:style style:family="text" style:name="T137">
      <style:text-properties fo:font-family="Courier New" style:font-family-asian="Courier New" style:font-family-complex="Courier New"/>
    </style:style>
    <style:style style:family="text" style:name="T138">
      <style:text-properties fo:font-family="Wingdings" style:font-family-asian="Wingdings" style:font-family-complex="Wingdings"/>
    </style:style>
    <style:style style:family="text" style:name="T139">
      <style:text-properties fo:font-family="Symbol" style:font-family-asian="Symbol" style:font-family-complex="Symbol"/>
    </style:style>
    <style:style style:family="text" style:name="T140">
      <style:text-properties fo:font-family="Courier New" style:font-family-asian="Courier New" style:font-family-complex="Courier New"/>
    </style:style>
    <style:style style:family="text" style:name="T141">
      <style:text-properties fo:font-family="Wingdings" style:font-family-asian="Wingdings" style:font-family-complex="Wingdings"/>
    </style:style>
    <style:style style:family="text" style:name="T142">
      <style:text-properties fo:font-family="Symbol" style:font-family-asian="Symbol" style:font-family-complex="Symbol"/>
    </style:style>
    <style:style style:family="text" style:name="T143">
      <style:text-properties fo:font-family="Courier New" style:font-family-asian="Courier New" style:font-family-complex="Courier New"/>
    </style:style>
    <style:style style:family="text" style:name="T144">
      <style:text-properties fo:font-family="Wingdings" style:font-family-asian="Wingdings" style:font-family-complex="Wingdings"/>
    </style:style>
    <style:style style:family="text" style:name="T145">
      <style:text-properties fo:font-family="Symbol" style:font-family-asian="Symbol" style:font-family-complex="Symbol"/>
    </style:style>
    <style:style style:family="text" style:name="T146">
      <style:text-properties fo:font-family="Courier New" style:font-family-asian="Courier New" style:font-family-complex="Courier New"/>
    </style:style>
    <style:style style:family="text" style:name="T147">
      <style:text-properties fo:font-family="Wingdings" style:font-family-asian="Wingdings" style:font-family-complex="Wingdings"/>
    </style:style>
    <style:style style:family="text" style:name="T148">
      <style:text-properties fo:font-family="Symbol" style:font-family-asian="Symbol" style:font-family-complex="Symbol"/>
    </style:style>
    <style:style style:family="text" style:name="T149">
      <style:text-properties fo:font-family="Courier New" style:font-family-asian="Courier New" style:font-family-complex="Courier New"/>
    </style:style>
    <style:style style:family="text" style:name="T150">
      <style:text-properties fo:font-family="Wingdings" style:font-family-asian="Wingdings" style:font-family-complex="Wingdings"/>
    </style:style>
    <style:style style:family="text" style:name="T151">
      <style:text-properties fo:font-family="Symbol" style:font-family-asian="Symbol" style:font-family-complex="Symbol"/>
    </style:style>
    <style:style style:family="text" style:name="T152">
      <style:text-properties fo:font-family="Courier New" style:font-family-asian="Courier New" style:font-family-complex="Courier New"/>
    </style:style>
    <style:style style:family="text" style:name="T153">
      <style:text-properties fo:font-family="Wingdings" style:font-family-asian="Wingdings" style:font-family-complex="Wingdings"/>
    </style:style>
    <style:style style:family="text" style:name="T154">
      <style:text-properties fo:font-family="Symbol" style:font-family-asian="Symbol" style:font-family-complex="Symbol"/>
    </style:style>
    <style:style style:family="text" style:name="T155">
      <style:text-properties fo:font-family="Courier New" style:font-family-asian="Courier New" style:font-family-complex="Courier New"/>
    </style:style>
    <style:style style:family="text" style:name="T156">
      <style:text-properties fo:font-family="Wingdings" style:font-family-asian="Wingdings" style:font-family-complex="Wingdings"/>
    </style:style>
    <style:style style:family="text" style:name="T157">
      <style:text-properties fo:font-family="Symbol" style:font-family-asian="Symbol" style:font-family-complex="Symbol"/>
    </style:style>
    <style:style style:family="text" style:name="T158">
      <style:text-properties fo:font-family="Courier New" style:font-family-asian="Courier New" style:font-family-complex="Courier New"/>
    </style:style>
    <style:style style:family="text" style:name="T159">
      <style:text-properties fo:font-family="Wingdings" style:font-family-asian="Wingdings" style:font-family-complex="Wingdings"/>
    </style:style>
    <style:style style:family="text" style:name="T160">
      <style:text-properties fo:font-family="Symbol" style:font-family-asian="Symbol" style:font-family-complex="Symbol"/>
    </style:style>
    <style:style style:family="text" style:name="T161">
      <style:text-properties fo:font-family="Courier New" style:font-family-asian="Courier New" style:font-family-complex="Courier New"/>
    </style:style>
    <style:style style:family="text" style:name="T162">
      <style:text-properties fo:font-family="Wingdings" style:font-family-asian="Wingdings" style:font-family-complex="Wingdings"/>
    </style:style>
    <style:style style:family="text" style:name="T163">
      <style:text-properties fo:font-family="Symbol" style:font-family-asian="Symbol" style:font-family-complex="Symbol"/>
    </style:style>
    <style:style style:family="text" style:name="T164">
      <style:text-properties fo:font-family="Courier New" style:font-family-asian="Courier New" style:font-family-complex="Courier New"/>
    </style:style>
    <style:style style:family="text" style:name="T165">
      <style:text-properties fo:font-family="Wingdings" style:font-family-asian="Wingdings" style:font-family-complex="Wingdings"/>
    </style:style>
    <style:style style:family="text" style:name="T166">
      <style:text-properties fo:font-family="Symbol" style:font-family-asian="Symbol" style:font-family-complex="Symbol"/>
    </style:style>
    <style:style style:family="text" style:name="T167">
      <style:text-properties fo:font-family="Courier New" style:font-family-asian="Courier New" style:font-family-complex="Courier New"/>
    </style:style>
    <style:style style:family="text" style:name="T168">
      <style:text-properties fo:font-family="Wingdings" style:font-family-asian="Wingdings" style:font-family-complex="Wingdings"/>
    </style:style>
    <style:style style:family="text" style:name="T169">
      <style:text-properties fo:font-family="Symbol" style:font-family-asian="Symbol" style:font-family-complex="Symbol"/>
    </style:style>
    <style:style style:family="text" style:name="T170">
      <style:text-properties fo:font-family="Courier New" style:font-family-asian="Courier New" style:font-family-complex="Courier New"/>
    </style:style>
    <style:style style:family="text" style:name="T171">
      <style:text-properties fo:font-family="Wingdings" style:font-family-asian="Wingdings" style:font-family-complex="Wingdings"/>
    </style:style>
    <style:style style:family="text" style:name="T172">
      <style:text-properties fo:font-family="Symbol" style:font-family-asian="Symbol" style:font-family-complex="Symbol"/>
    </style:style>
    <style:style style:family="text" style:name="T173">
      <style:text-properties fo:font-family="Courier New" style:font-family-asian="Courier New" style:font-family-complex="Courier New"/>
    </style:style>
    <style:style style:family="text" style:name="T174">
      <style:text-properties fo:font-family="Wingdings" style:font-family-asian="Wingdings" style:font-family-complex="Wingdings"/>
    </style:style>
    <style:style style:family="text" style:name="T175">
      <style:text-properties fo:font-family="Symbol" style:font-family-asian="Symbol" style:font-family-complex="Symbol"/>
    </style:style>
    <style:style style:family="text" style:name="T176">
      <style:text-properties fo:font-family="Courier New" style:font-family-asian="Courier New" style:font-family-complex="Courier New"/>
    </style:style>
    <style:style style:family="text" style:name="T177">
      <style:text-properties fo:font-family="Wingdings" style:font-family-asian="Wingdings" style:font-family-complex="Wingdings"/>
    </style:style>
    <style:style style:family="text" style:name="T178">
      <style:text-properties fo:font-family="Symbol" style:font-family-asian="Symbol" style:font-family-complex="Symbol"/>
    </style:style>
    <style:style style:family="text" style:name="T179">
      <style:text-properties fo:font-family="Courier New" style:font-family-asian="Courier New" style:font-family-complex="Courier New"/>
    </style:style>
    <style:style style:family="text" style:name="T180">
      <style:text-properties fo:font-family="Wingdings" style:font-family-asian="Wingdings" style:font-family-complex="Wingdings"/>
    </style:style>
    <style:style style:family="text" style:name="T181">
      <style:text-properties fo:font-family="Symbol" style:font-family-asian="Symbol" style:font-family-complex="Symbol"/>
    </style:style>
    <style:style style:family="text" style:name="T182">
      <style:text-properties fo:font-family="Courier New" style:font-family-asian="Courier New" style:font-family-complex="Courier New"/>
    </style:style>
    <style:style style:family="text" style:name="T183">
      <style:text-properties fo:font-family="Wingdings" style:font-family-asian="Wingdings" style:font-family-complex="Wingdings"/>
    </style:style>
    <style:style style:family="text" style:name="T184">
      <style:text-properties fo:font-family="Symbol" style:font-family-asian="Symbol" style:font-family-complex="Symbol"/>
    </style:style>
    <style:style style:family="text" style:name="T185">
      <style:text-properties fo:font-family="Courier New" style:font-family-asian="Courier New" style:font-family-complex="Courier New"/>
    </style:style>
    <style:style style:family="text" style:name="T186">
      <style:text-properties fo:font-family="Wingdings" style:font-family-asian="Wingdings" style:font-family-complex="Wingdings"/>
    </style:style>
    <style:style style:family="text" style:name="T187">
      <style:text-properties fo:font-family="Symbol" style:font-family-asian="Symbol" style:font-family-complex="Symbol"/>
    </style:style>
    <style:style style:family="text" style:name="T188">
      <style:text-properties fo:font-family="Courier New" style:font-family-asian="Courier New" style:font-family-complex="Courier New"/>
    </style:style>
    <style:style style:family="text" style:name="T189">
      <style:text-properties fo:font-family="Wingdings" style:font-family-asian="Wingdings" style:font-family-complex="Wingdings"/>
    </style:style>
    <style:style style:family="text" style:name="T190">
      <style:text-properties fo:font-family="Symbol" style:font-family-asian="Symbol" style:font-family-complex="Symbol"/>
    </style:style>
    <style:style style:family="text" style:name="T191">
      <style:text-properties fo:font-family="Courier New" style:font-family-asian="Courier New" style:font-family-complex="Courier New"/>
    </style:style>
    <style:style style:family="text" style:name="T192">
      <style:text-properties fo:font-family="Wingdings" style:font-family-asian="Wingdings" style:font-family-complex="Wingdings"/>
    </style:style>
    <style:style style:family="text" style:name="T193">
      <style:text-properties fo:font-family="Symbol" style:font-family-asian="Symbol" style:font-family-complex="Symbol"/>
    </style:style>
    <style:style style:family="text" style:name="T194">
      <style:text-properties fo:font-family="Courier New" style:font-family-asian="Courier New" style:font-family-complex="Courier New"/>
    </style:style>
    <style:style style:family="text" style:name="T195">
      <style:text-properties fo:font-family="Wingdings" style:font-family-asian="Wingdings" style:font-family-complex="Wingdings"/>
    </style:style>
    <style:style style:family="text" style:name="T196">
      <style:text-properties fo:font-family="Symbol" style:font-family-asian="Symbol" style:font-family-complex="Symbol"/>
    </style:style>
    <style:style style:family="text" style:name="T197">
      <style:text-properties fo:font-family="Courier New" style:font-family-asian="Courier New" style:font-family-complex="Courier New"/>
    </style:style>
    <style:style style:family="text" style:name="T198">
      <style:text-properties fo:font-family="Wingdings" style:font-family-asian="Wingdings" style:font-family-complex="Wingdings"/>
    </style:style>
    <style:style style:family="text" style:name="T199">
      <style:text-properties fo:font-family="Symbol" style:font-family-asian="Symbol" style:font-family-complex="Symbol"/>
    </style:style>
    <style:style style:family="text" style:name="T200">
      <style:text-properties fo:font-family="Courier New" style:font-family-asian="Courier New" style:font-family-complex="Courier New"/>
    </style:style>
    <style:style style:family="text" style:name="T201">
      <style:text-properties fo:font-family="Wingdings" style:font-family-asian="Wingdings" style:font-family-complex="Wingdings"/>
    </style:style>
    <style:style style:family="text" style:name="T202">
      <style:text-properties fo:font-family="Symbol" style:font-family-asian="Symbol" style:font-family-complex="Symbol"/>
    </style:style>
    <style:style style:family="text" style:name="T203">
      <style:text-properties fo:font-family="Courier New" style:font-family-asian="Courier New" style:font-family-complex="Courier New"/>
    </style:style>
    <style:style style:family="text" style:name="T204">
      <style:text-properties fo:font-family="Wingdings" style:font-family-asian="Wingdings" style:font-family-complex="Wingdings"/>
    </style:style>
    <style:style style:family="text" style:name="T205">
      <style:text-properties fo:font-family="Symbol" style:font-family-asian="Symbol" style:font-family-complex="Symbol"/>
    </style:style>
    <style:style style:family="text" style:name="T206">
      <style:text-properties fo:font-family="Courier New" style:font-family-asian="Courier New" style:font-family-complex="Courier New"/>
    </style:style>
    <style:style style:family="text" style:name="T207">
      <style:text-properties fo:font-family="Wingdings" style:font-family-asian="Wingdings" style:font-family-complex="Wingdings"/>
    </style:style>
    <style:style style:family="text" style:name="T208">
      <style:text-properties fo:font-family="Symbol" style:font-family-asian="Symbol" style:font-family-complex="Symbol"/>
    </style:style>
    <style:style style:family="text" style:name="T209">
      <style:text-properties fo:font-family="Courier New" style:font-family-asian="Courier New" style:font-family-complex="Courier New"/>
    </style:style>
    <style:style style:family="text" style:name="T210">
      <style:text-properties fo:font-family="Wingdings" style:font-family-asian="Wingdings" style:font-family-complex="Wingdings"/>
    </style:style>
    <style:style style:family="text" style:name="T211">
      <style:text-properties fo:font-family="Symbol" style:font-family-asian="Symbol" style:font-family-complex="Symbol"/>
    </style:style>
    <style:style style:family="text" style:name="T212">
      <style:text-properties fo:font-family="Courier New" style:font-family-asian="Courier New" style:font-family-complex="Courier New"/>
    </style:style>
    <style:style style:family="text" style:name="T213">
      <style:text-properties fo:font-family="Wingdings" style:font-family-asian="Wingdings" style:font-family-complex="Wingdings"/>
    </style:style>
    <style:style style:family="text" style:name="T214">
      <style:text-properties fo:font-family="Symbol" style:font-family-asian="Symbol" style:font-family-complex="Symbol"/>
    </style:style>
    <style:style style:family="text" style:name="T215">
      <style:text-properties fo:font-family="Courier New" style:font-family-asian="Courier New" style:font-family-complex="Courier New"/>
    </style:style>
    <style:style style:family="text" style:name="T216">
      <style:text-properties fo:font-family="Wingdings" style:font-family-asian="Wingdings" style:font-family-complex="Wingdings"/>
    </style:style>
    <style:style style:family="text" style:name="T217">
      <style:text-properties fo:font-family="Symbol" style:font-family-asian="Symbol" style:font-family-complex="Symbol"/>
    </style:style>
    <style:style style:family="text" style:name="T218">
      <style:text-properties fo:font-family="Courier New" style:font-family-asian="Courier New" style:font-family-complex="Courier New"/>
    </style:style>
    <style:style style:family="text" style:name="T219">
      <style:text-properties fo:font-family="Wingdings" style:font-family-asian="Wingdings" style:font-family-complex="Wingdings"/>
    </style:style>
    <style:style style:family="text" style:name="T220">
      <style:text-properties fo:font-family="Symbol" style:font-family-asian="Symbol" style:font-family-complex="Symbol"/>
    </style:style>
    <style:style style:family="text" style:name="T221">
      <style:text-properties fo:font-family="Courier New" style:font-family-asian="Courier New" style:font-family-complex="Courier New"/>
    </style:style>
    <style:style style:family="text" style:name="T222">
      <style:text-properties fo:font-family="Wingdings" style:font-family-asian="Wingdings" style:font-family-complex="Wingdings"/>
    </style:style>
    <style:style style:family="text" style:name="T223">
      <style:text-properties fo:font-family="Symbol" style:font-family-asian="Symbol" style:font-family-complex="Symbol"/>
    </style:style>
    <style:style style:family="text" style:name="T224">
      <style:text-properties fo:font-family="Courier New" style:font-family-asian="Courier New" style:font-family-complex="Courier New"/>
    </style:style>
    <style:style style:family="text" style:name="T225">
      <style:text-properties fo:font-family="Wingdings" style:font-family-asian="Wingdings" style:font-family-complex="Wingdings"/>
    </style:style>
    <style:style style:family="text" style:name="T226">
      <style:text-properties fo:font-family="Symbol" style:font-family-asian="Symbol" style:font-family-complex="Symbol"/>
    </style:style>
    <style:style style:family="text" style:name="T227">
      <style:text-properties fo:font-family="Courier New" style:font-family-asian="Courier New" style:font-family-complex="Courier New"/>
    </style:style>
    <style:style style:family="text" style:name="T228">
      <style:text-properties fo:font-family="Wingdings" style:font-family-asian="Wingdings" style:font-family-complex="Wingdings"/>
    </style:style>
    <style:style style:family="text" style:name="T229">
      <style:text-properties fo:font-family="Symbol" style:font-family-asian="Symbol" style:font-family-complex="Symbol"/>
    </style:style>
    <style:style style:family="text" style:name="T230">
      <style:text-properties fo:font-family="Courier New" style:font-family-asian="Courier New" style:font-family-complex="Courier New"/>
    </style:style>
    <style:style style:family="text" style:name="T231">
      <style:text-properties fo:font-family="Wingdings" style:font-family-asian="Wingdings" style:font-family-complex="Wingdings"/>
    </style:style>
    <style:style style:family="text" style:name="T232">
      <style:text-properties fo:font-family="Symbol" style:font-family-asian="Symbol" style:font-family-complex="Symbol"/>
    </style:style>
    <style:style style:family="text" style:name="T233">
      <style:text-properties fo:font-family="Courier New" style:font-family-asian="Courier New" style:font-family-complex="Courier New"/>
    </style:style>
    <style:style style:family="text" style:name="T234">
      <style:text-properties fo:font-family="Wingdings" style:font-family-asian="Wingdings" style:font-family-complex="Wingdings"/>
    </style:style>
    <style:style style:family="text" style:name="T235">
      <style:text-properties fo:font-family="Symbol" style:font-family-asian="Symbol" style:font-family-complex="Symbol"/>
    </style:style>
    <style:style style:family="text" style:name="T236">
      <style:text-properties fo:font-family="Courier New" style:font-family-asian="Courier New" style:font-family-complex="Courier New"/>
    </style:style>
    <style:style style:family="text" style:name="T237">
      <style:text-properties fo:font-family="Wingdings" style:font-family-asian="Wingdings" style:font-family-complex="Wingdings"/>
    </style:style>
    <style:style style:family="text" style:name="T238">
      <style:text-properties fo:font-family="Symbol" style:font-family-asian="Symbol" style:font-family-complex="Symbol"/>
    </style:style>
    <style:style style:family="text" style:name="T239">
      <style:text-properties fo:font-family="Courier New" style:font-family-asian="Courier New" style:font-family-complex="Courier New"/>
    </style:style>
    <style:style style:family="text" style:name="T240">
      <style:text-properties fo:font-family="Wingdings" style:font-family-asian="Wingdings" style:font-family-complex="Wingdings"/>
    </style:style>
    <style:style style:family="text" style:name="T241">
      <style:text-properties fo:font-family="Symbol" style:font-family-asian="Symbol" style:font-family-complex="Symbol"/>
    </style:style>
    <style:style style:family="text" style:name="T242">
      <style:text-properties fo:font-family="Courier New" style:font-family-asian="Courier New" style:font-family-complex="Courier New"/>
    </style:style>
    <style:style style:family="text" style:name="T243">
      <style:text-properties fo:font-family="Wingdings" style:font-family-asian="Wingdings" style:font-family-complex="Wingdings"/>
    </style:style>
    <style:style style:family="text" style:name="T244">
      <style:text-properties fo:font-family="Symbol" style:font-family-asian="Symbol" style:font-family-complex="Symbol"/>
    </style:style>
    <style:style style:family="text" style:name="T245">
      <style:text-properties fo:font-family="Courier New" style:font-family-asian="Courier New" style:font-family-complex="Courier New"/>
    </style:style>
    <style:style style:family="text" style:name="T246">
      <style:text-properties fo:font-family="Wingdings" style:font-family-asian="Wingdings" style:font-family-complex="Wingdings"/>
    </style:style>
    <style:style style:family="text" style:name="T247">
      <style:text-properties fo:font-family="Symbol" style:font-family-asian="Symbol" style:font-family-complex="Symbol"/>
    </style:style>
    <style:style style:family="text" style:name="T248">
      <style:text-properties fo:font-family="Courier New" style:font-family-asian="Courier New" style:font-family-complex="Courier New"/>
    </style:style>
    <style:style style:family="text" style:name="T249">
      <style:text-properties fo:font-family="Wingdings" style:font-family-asian="Wingdings" style:font-family-complex="Wingdings"/>
    </style:style>
    <style:style style:family="text" style:name="T250">
      <style:text-properties fo:font-family="Symbol" style:font-family-asian="Symbol" style:font-family-complex="Symbol"/>
    </style:style>
    <style:style style:family="text" style:name="T251">
      <style:text-properties fo:font-family="Courier New" style:font-family-asian="Courier New" style:font-family-complex="Courier New"/>
    </style:style>
    <style:style style:family="text" style:name="T252">
      <style:text-properties fo:font-family="Wingdings" style:font-family-asian="Wingdings" style:font-family-complex="Wingdings"/>
    </style:style>
    <style:style style:family="text" style:name="T253">
      <style:text-properties fo:font-family="Symbol" style:font-family-asian="Symbol" style:font-family-complex="Symbol"/>
    </style:style>
    <style:style style:family="text" style:name="T254">
      <style:text-properties fo:font-family="Courier New" style:font-family-asian="Courier New" style:font-family-complex="Courier New"/>
    </style:style>
    <style:style style:family="text" style:name="T255">
      <style:text-properties fo:font-family="Wingdings" style:font-family-asian="Wingdings" style:font-family-complex="Wingdings"/>
    </style:style>
    <style:style style:family="text" style:name="T256">
      <style:text-properties fo:font-family="Symbol" style:font-family-asian="Symbol" style:font-family-complex="Symbol"/>
    </style:style>
    <style:style style:family="text" style:name="T257">
      <style:text-properties fo:font-family="Courier New" style:font-family-asian="Courier New" style:font-family-complex="Courier New"/>
    </style:style>
    <style:style style:family="text" style:name="T258">
      <style:text-properties fo:font-family="Wingdings" style:font-family-asian="Wingdings" style:font-family-complex="Wingdings"/>
    </style:style>
    <style:style style:family="text" style:name="T259">
      <style:text-properties fo:font-family="Symbol" style:font-family-asian="Symbol" style:font-family-complex="Symbol"/>
    </style:style>
    <style:style style:family="text" style:name="T260">
      <style:text-properties fo:font-family="Courier New" style:font-family-asian="Courier New" style:font-family-complex="Courier New"/>
    </style:style>
    <style:style style:family="text" style:name="T261">
      <style:text-properties fo:font-family="Wingdings" style:font-family-asian="Wingdings" style:font-family-complex="Wingdings"/>
    </style:style>
    <style:style style:family="text" style:name="T262">
      <style:text-properties fo:font-family="Symbol" style:font-family-asian="Symbol" style:font-family-complex="Symbol"/>
    </style:style>
    <style:style style:family="text" style:name="T263">
      <style:text-properties fo:font-family="Courier New" style:font-family-asian="Courier New" style:font-family-complex="Courier New"/>
    </style:style>
    <style:style style:family="text" style:name="T264">
      <style:text-properties fo:font-family="Wingdings" style:font-family-asian="Wingdings" style:font-family-complex="Wingdings"/>
    </style:style>
    <style:style style:family="text" style:name="T265">
      <style:text-properties fo:font-family="Symbol" style:font-family-asian="Symbol" style:font-family-complex="Symbol"/>
    </style:style>
    <style:style style:family="text" style:name="T266">
      <style:text-properties fo:font-family="Courier New" style:font-family-asian="Courier New" style:font-family-complex="Courier New"/>
    </style:style>
    <style:style style:family="text" style:name="T267">
      <style:text-properties fo:font-family="Wingdings" style:font-family-asian="Wingdings" style:font-family-complex="Wingdings"/>
    </style:style>
    <style:style style:family="text" style:name="T268">
      <style:text-properties fo:font-family="Symbol" style:font-family-asian="Symbol" style:font-family-complex="Symbol"/>
    </style:style>
    <style:style style:family="text" style:name="T269">
      <style:text-properties fo:font-family="Courier New" style:font-family-asian="Courier New" style:font-family-complex="Courier New"/>
    </style:style>
    <style:style style:family="text" style:name="T270">
      <style:text-properties fo:font-family="Wingdings" style:font-family-asian="Wingdings" style:font-family-complex="Wingdings"/>
    </style:style>
    <style:style style:family="text" style:name="T271">
      <style:text-properties fo:font-family="Symbol" style:font-family-asian="Symbol" style:font-family-complex="Symbol"/>
    </style:style>
    <style:style style:family="text" style:name="T272">
      <style:text-properties fo:font-family="Courier New" style:font-family-asian="Courier New" style:font-family-complex="Courier New"/>
    </style:style>
    <style:style style:family="text" style:name="T273">
      <style:text-properties fo:font-family="Wingdings" style:font-family-asian="Wingdings" style:font-family-complex="Wingdings"/>
    </style:style>
    <style:style style:family="text" style:name="T274">
      <style:text-properties fo:font-family="Symbol" style:font-family-asian="Symbol" style:font-family-complex="Symbol"/>
    </style:style>
    <style:style style:family="text" style:name="T275">
      <style:text-properties fo:font-family="Courier New" style:font-family-asian="Courier New" style:font-family-complex="Courier New"/>
    </style:style>
    <style:style style:family="text" style:name="T276">
      <style:text-properties fo:font-family="Wingdings" style:font-family-asian="Wingdings" style:font-family-complex="Wingdings"/>
    </style:style>
    <style:style style:family="text" style:name="T277">
      <style:text-properties fo:font-family="Symbol" style:font-family-asian="Symbol" style:font-family-complex="Symbol"/>
    </style:style>
    <style:style style:family="text" style:name="T278">
      <style:text-properties fo:font-family="Courier New" style:font-family-asian="Courier New" style:font-family-complex="Courier New"/>
    </style:style>
    <style:style style:family="text" style:name="T279">
      <style:text-properties fo:font-family="Wingdings" style:font-family-asian="Wingdings" style:font-family-complex="Wingdings"/>
    </style:style>
    <style:style style:family="text" style:name="T280">
      <style:text-properties fo:font-family="Symbol" style:font-family-asian="Symbol" style:font-family-complex="Symbol"/>
    </style:style>
    <style:style style:family="text" style:name="T281">
      <style:text-properties fo:font-family="Courier New" style:font-family-asian="Courier New" style:font-family-complex="Courier New"/>
    </style:style>
    <style:style style:family="text" style:name="T282">
      <style:text-properties fo:font-family="Wingdings" style:font-family-asian="Wingdings" style:font-family-complex="Wingdings"/>
    </style:style>
    <style:style style:family="text" style:name="T283">
      <style:text-properties fo:font-family="Symbol" style:font-family-asian="Symbol" style:font-family-complex="Symbol"/>
    </style:style>
    <style:style style:family="text" style:name="T284">
      <style:text-properties fo:font-family="Courier New" style:font-family-asian="Courier New" style:font-family-complex="Courier New"/>
    </style:style>
    <style:style style:family="text" style:name="T285">
      <style:text-properties fo:font-family="Wingdings" style:font-family-asian="Wingdings" style:font-family-complex="Wingdings"/>
    </style:style>
    <style:style style:family="text" style:name="T286">
      <style:text-properties fo:font-family="Symbol" style:font-family-asian="Symbol" style:font-family-complex="Symbol"/>
    </style:style>
    <style:style style:family="text" style:name="T287">
      <style:text-properties fo:font-family="Courier New" style:font-family-asian="Courier New" style:font-family-complex="Courier New"/>
    </style:style>
    <style:style style:family="text" style:name="T288">
      <style:text-properties fo:font-family="Wingdings" style:font-family-asian="Wingdings" style:font-family-complex="Wingdings"/>
    </style:style>
    <style:style style:family="text" style:name="T289">
      <style:text-properties fo:font-family="Symbol" style:font-family-asian="Symbol" style:font-family-complex="Symbol"/>
    </style:style>
    <style:style style:family="text" style:name="T290">
      <style:text-properties fo:font-family="Courier New" style:font-family-asian="Courier New" style:font-family-complex="Courier New"/>
    </style:style>
    <style:style style:family="text" style:name="T291">
      <style:text-properties fo:font-family="Wingdings" style:font-family-asian="Wingdings" style:font-family-complex="Wingdings"/>
    </style:style>
    <style:style style:family="text" style:name="T292">
      <style:text-properties fo:font-family="Symbol" style:font-family-asian="Symbol" style:font-family-complex="Symbol"/>
    </style:style>
    <style:style style:family="text" style:name="T293">
      <style:text-properties fo:font-family="Courier New" style:font-family-asian="Courier New" style:font-family-complex="Courier New"/>
    </style:style>
    <style:style style:family="text" style:name="T294">
      <style:text-properties fo:font-family="Wingdings" style:font-family-asian="Wingdings" style:font-family-complex="Wingdings"/>
    </style:style>
    <style:style style:family="text" style:name="T295">
      <style:text-properties fo:font-family="Symbol" style:font-family-asian="Symbol" style:font-family-complex="Symbol"/>
    </style:style>
    <style:style style:family="text" style:name="T296">
      <style:text-properties fo:font-family="Courier New" style:font-family-asian="Courier New" style:font-family-complex="Courier New"/>
    </style:style>
    <style:style style:family="text" style:name="T297">
      <style:text-properties fo:font-family="Wingdings" style:font-family-asian="Wingdings" style:font-family-complex="Wingdings"/>
    </style:style>
    <style:style style:family="text" style:name="T298">
      <style:text-properties fo:font-family="Symbol" style:font-family-asian="Symbol" style:font-family-complex="Symbol"/>
    </style:style>
    <style:style style:family="text" style:name="T299">
      <style:text-properties fo:font-family="Courier New" style:font-family-asian="Courier New" style:font-family-complex="Courier New"/>
    </style:style>
    <style:style style:family="text" style:name="T300">
      <style:text-properties fo:font-family="Wingdings" style:font-family-asian="Wingdings" style:font-family-complex="Wingdings"/>
    </style:style>
    <style:style style:family="text" style:name="T301">
      <style:text-properties fo:font-family="Symbol" style:font-family-asian="Symbol" style:font-family-complex="Symbol"/>
    </style:style>
    <style:style style:family="text" style:name="T302">
      <style:text-properties fo:font-family="Courier New" style:font-family-asian="Courier New" style:font-family-complex="Courier New"/>
    </style:style>
    <style:style style:family="text" style:name="T303">
      <style:text-properties fo:font-family="Wingdings" style:font-family-asian="Wingdings" style:font-family-complex="Wingdings"/>
    </style:style>
    <style:style style:family="text" style:name="T304">
      <style:text-properties fo:font-family="Symbol" style:font-family-asian="Symbol" style:font-family-complex="Symbol"/>
    </style:style>
    <style:style style:family="text" style:name="T305">
      <style:text-properties fo:font-family="Courier New" style:font-family-asian="Courier New" style:font-family-complex="Courier New"/>
    </style:style>
    <style:style style:family="text" style:name="T306">
      <style:text-properties fo:font-family="Wingdings" style:font-family-asian="Wingdings" style:font-family-complex="Wingdings"/>
    </style:style>
    <style:style style:family="text" style:name="T307">
      <style:text-properties fo:font-family="Symbol" style:font-family-asian="Symbol" style:font-family-complex="Symbol"/>
    </style:style>
    <style:style style:family="text" style:name="T308">
      <style:text-properties fo:font-family="Courier New" style:font-family-asian="Courier New" style:font-family-complex="Courier New"/>
    </style:style>
    <style:style style:family="text" style:name="T309">
      <style:text-properties fo:font-family="Wingdings" style:font-family-asian="Wingdings" style:font-family-complex="Wingdings"/>
    </style:style>
    <style:style style:family="text" style:name="T310">
      <style:text-properties fo:font-family="Symbol" style:font-family-asian="Symbol" style:font-family-complex="Symbol"/>
    </style:style>
    <style:style style:family="text" style:name="T311">
      <style:text-properties fo:font-family="Courier New" style:font-family-asian="Courier New" style:font-family-complex="Courier New"/>
    </style:style>
    <style:style style:family="text" style:name="T312">
      <style:text-properties fo:font-family="Wingdings" style:font-family-asian="Wingdings" style:font-family-complex="Wingdings"/>
    </style:style>
    <style:style style:family="text" style:name="T313">
      <style:text-properties fo:font-family="Symbol" style:font-family-asian="Symbol" style:font-family-complex="Symbol"/>
    </style:style>
    <style:style style:family="text" style:name="T314">
      <style:text-properties fo:font-family="Courier New" style:font-family-asian="Courier New" style:font-family-complex="Courier New"/>
    </style:style>
    <style:style style:family="text" style:name="T315">
      <style:text-properties fo:font-family="Wingdings" style:font-family-asian="Wingdings" style:font-family-complex="Wingdings"/>
    </style:style>
    <style:style style:family="text" style:name="T316">
      <style:text-properties fo:font-family="Symbol" style:font-family-asian="Symbol" style:font-family-complex="Symbol"/>
    </style:style>
    <style:style style:family="text" style:name="T317">
      <style:text-properties fo:font-family="Courier New" style:font-family-asian="Courier New" style:font-family-complex="Courier New"/>
    </style:style>
    <style:style style:family="text" style:name="T318">
      <style:text-properties fo:font-family="Wingdings" style:font-family-asian="Wingdings" style:font-family-complex="Wingdings"/>
    </style:style>
    <style:style style:family="text" style:name="T319">
      <style:text-properties fo:font-family="Symbol" style:font-family-asian="Symbol" style:font-family-complex="Symbol"/>
    </style:style>
    <style:style style:family="text" style:name="T320">
      <style:text-properties fo:font-family="Courier New" style:font-family-asian="Courier New" style:font-family-complex="Courier New"/>
    </style:style>
    <style:style style:family="text" style:name="T321">
      <style:text-properties fo:font-family="Wingdings" style:font-family-asian="Wingdings" style:font-family-complex="Wingdings"/>
    </style:style>
    <style:style style:family="text" style:name="T322">
      <style:text-properties fo:font-family="Symbol" style:font-family-asian="Symbol" style:font-family-complex="Symbol"/>
    </style:style>
    <style:style style:family="text" style:name="T323">
      <style:text-properties fo:font-family="Courier New" style:font-family-asian="Courier New" style:font-family-complex="Courier New"/>
    </style:style>
    <style:style style:family="text" style:name="T324">
      <style:text-properties fo:font-family="Wingdings" style:font-family-asian="Wingdings" style:font-family-complex="Wingdings"/>
    </style:style>
    <style:style style:family="text" style:name="T325">
      <style:text-properties fo:font-family="Symbol" style:font-family-asian="Symbol" style:font-family-complex="Symbol"/>
    </style:style>
    <style:style style:family="text" style:name="T326">
      <style:text-properties fo:font-family="Courier New" style:font-family-asian="Courier New" style:font-family-complex="Courier New"/>
    </style:style>
    <style:style style:family="text" style:name="T327">
      <style:text-properties fo:font-family="Wingdings" style:font-family-asian="Wingdings" style:font-family-complex="Wingdings"/>
    </style:style>
    <style:style style:family="text" style:name="T328">
      <style:text-properties fo:font-family="Symbol" style:font-family-asian="Symbol" style:font-family-complex="Symbol"/>
    </style:style>
    <style:style style:family="text" style:name="T329">
      <style:text-properties fo:font-family="Courier New" style:font-family-asian="Courier New" style:font-family-complex="Courier New"/>
    </style:style>
    <style:style style:family="text" style:name="T330">
      <style:text-properties fo:font-family="Wingdings" style:font-family-asian="Wingdings" style:font-family-complex="Wingdings"/>
    </style:style>
    <style:style style:family="text" style:name="T331">
      <style:text-properties fo:font-family="Symbol" style:font-family-asian="Symbol" style:font-family-complex="Symbol"/>
    </style:style>
    <style:style style:family="text" style:name="T332">
      <style:text-properties fo:font-family="Courier New" style:font-family-asian="Courier New" style:font-family-complex="Courier New"/>
    </style:style>
    <style:style style:family="text" style:name="T333">
      <style:text-properties fo:font-family="Wingdings" style:font-family-asian="Wingdings" style:font-family-complex="Wingdings"/>
    </style:style>
    <style:style style:family="text" style:name="T334">
      <style:text-properties fo:font-family="Symbol" style:font-family-asian="Symbol" style:font-family-complex="Symbol"/>
    </style:style>
    <style:style style:family="text" style:name="T335">
      <style:text-properties fo:font-family="Courier New" style:font-family-asian="Courier New" style:font-family-complex="Courier New"/>
    </style:style>
    <style:style style:family="text" style:name="T336">
      <style:text-properties fo:font-family="Wingdings" style:font-family-asian="Wingdings" style:font-family-complex="Wingdings"/>
    </style:style>
    <style:style style:family="text" style:name="T337">
      <style:text-properties fo:font-family="Symbol" style:font-family-asian="Symbol" style:font-family-complex="Symbol"/>
    </style:style>
    <style:style style:family="text" style:name="T338">
      <style:text-properties fo:font-family="Courier New" style:font-family-asian="Courier New" style:font-family-complex="Courier New"/>
    </style:style>
    <style:style style:family="text" style:name="T339">
      <style:text-properties fo:font-family="Wingdings" style:font-family-asian="Wingdings" style:font-family-complex="Wingdings"/>
    </style:style>
    <style:style style:family="text" style:name="T340">
      <style:text-properties fo:font-family="Symbol" style:font-family-asian="Symbol" style:font-family-complex="Symbol"/>
    </style:style>
    <style:style style:family="text" style:name="T341">
      <style:text-properties fo:font-family="Courier New" style:font-family-asian="Courier New" style:font-family-complex="Courier New"/>
    </style:style>
    <style:style style:family="text" style:name="T342">
      <style:text-properties fo:font-family="Wingdings" style:font-family-asian="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
      <text:list-level-style-number text:level="1" text:style-name="T46"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7"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48" style:num-format="1" style:num-suffix=".">
        <style:list-level-properties text:list-level-position-and-space-mode="label-alignment">
          <style:list-level-label-alignment fo:text-indent="-0.635cm" fo:margin-left="3.791cm"/>
        </style:list-level-properties>
        <style:text-properties/>
      </text:list-level-style-number>
      <text:list-level-style-number text:level="4" text:style-name="T4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0"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51" style:num-format="1" style:num-suffix=".">
        <style:list-level-properties text:list-level-position-and-space-mode="label-alignment">
          <style:list-level-label-alignment fo:text-indent="-0.635cm" fo:margin-left="7.601cm"/>
        </style:list-level-properties>
        <style:text-properties/>
      </text:list-level-style-number>
      <text:list-level-style-number text:level="7" text:style-name="T5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53"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54" style:num-format="1" style:num-suffix=".">
        <style:list-level-properties text:list-level-position-and-space-mode="label-alignment">
          <style:list-level-label-alignment fo:text-indent="-0.635cm" fo:margin-left="11.41cm"/>
        </style:list-level-properties>
        <style:text-properties/>
      </text:list-level-style-number>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9">
      <text:list-level-style-bullet text:level="1" text:style-name="T7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0">
      <text:list-level-style-bullet text:level="1" text:style-name="T8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1">
      <text:list-level-style-bullet text:level="1" text:style-name="T9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2">
      <text:list-level-style-bullet text:level="1" text:style-name="T10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3">
      <text:list-level-style-bullet text:level="1" text:style-name="T10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4">
      <text:list-level-style-bullet text:level="1" text:style-name="T11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2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2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5">
      <text:list-level-style-bullet text:level="1" text:style-name="T12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2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3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3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6">
      <text:list-level-style-bullet text:level="1" text:style-name="T13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7">
      <text:list-level-style-bullet text:level="1" text:style-name="T14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4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5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8">
      <text:list-level-style-bullet text:level="1" text:style-name="T15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5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5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5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5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6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6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9">
      <text:list-level-style-bullet text:level="1" text:style-name="T16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6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6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0">
      <text:list-level-style-bullet text:level="1" text:style-name="T17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7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7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1">
      <text:list-level-style-bullet text:level="1" text:style-name="T18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8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8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8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2">
      <text:list-level-style-bullet text:level="1" text:style-name="T19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9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9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9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9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9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9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9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9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3">
      <text:list-level-style-bullet text:level="1" text:style-name="T19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0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0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0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0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0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0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0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4">
      <text:list-level-style-bullet text:level="1" text:style-name="T20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1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1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1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1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1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1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5">
      <text:list-level-style-bullet text:level="1" text:style-name="T21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1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2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2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6">
      <text:list-level-style-bullet text:level="1" text:style-name="T22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2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2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3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3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3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3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7">
      <text:list-level-style-bullet text:level="1" text:style-name="T23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3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4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8">
      <text:list-level-style-bullet text:level="1" text:style-name="T24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4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4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4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4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5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5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9">
      <text:list-level-style-bullet text:level="1" text:style-name="T25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5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5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5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5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5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6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0">
      <text:list-level-style-bullet text:level="1" text:style-name="T26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6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6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6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6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6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6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1">
      <text:list-level-style-bullet text:level="1" text:style-name="T27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7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7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7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7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7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7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7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2">
      <text:list-level-style-bullet text:level="1" text:style-name="T28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8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8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8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8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8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8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8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8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3">
      <text:list-level-style-bullet text:level="1" text:style-name="T28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9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9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9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9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9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9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9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4">
      <text:list-level-style-bullet text:level="1" text:style-name="T29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0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0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0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0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0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0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5">
      <text:list-level-style-bullet text:level="1" text:style-name="T30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0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1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1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1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1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1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6">
      <text:list-level-style-bullet text:level="1" text:style-name="T31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1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1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2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2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2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2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7">
      <text:list-level-style-bullet text:level="1" text:style-name="T32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2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2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2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3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3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3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8">
      <text:list-level-style-bullet text:level="1" text:style-name="T33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3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3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3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3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4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4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59cm" fo:page-height="27.94cm" style:print-orientation="portrait" fo:margin-top="1.27cm" fo:margin-bottom="1.27cm" fo:margin-left="2.54cm" fo:margin-right="2.54cm"/>
    </style:page-layout>
    <style:page-layout style:name="Mpm2">
      <style:page-layout-properties fo:page-width="21.59cm" fo:page-height="27.94cm" style:print-orientation="portrait" fo:margin-top="1.27cm" fo:margin-bottom="1.27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4.0.129</meta:generator>
    <dc:creator/>
  </office:meta>
</office:document-meta>
</file>