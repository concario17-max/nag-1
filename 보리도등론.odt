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paragraph-properties fo:line-height="115%" fo:margin-left="0cm" fo:margin-right="0cm" fo:text-indent="0cm" fo:margin-top="0pt" fo:margin-bottom="0pt" fo:border="none"/>
      <style:text-properties/>
    </style:style>
    <style:style style:family="text" style:name="T662">
      <style:text-properties fo:color="#1f1f1f" fo:font-family="Arial" style:font-family-asian="Arial" style:font-family-complex="Arial" fo:font-size="12pt"/>
    </style:style>
    <style:style style:parent-style-name="851" style:family="paragraph" style:name="P3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63">
      <style:text-properties fo:color="#1f1f1f" fo:font-family="Arial" style:font-family-asian="Arial" style:font-family-complex="Arial" fo:font-size="14pt" fo:font-weight="bold"/>
    </style:style>
    <style:style style:family="paragraph" style:name="P35">
      <style:paragraph-properties fo:line-height="115%" fo:margin-left="0cm" fo:margin-right="0cm" fo:text-indent="0cm" fo:margin-top="0pt" fo:margin-bottom="0pt" fo:border="none"/>
      <style:text-properties/>
    </style:style>
    <style:style style:family="text" style:name="T664">
      <style:text-properties fo:color="#1f1f1f" fo:font-family="Arial" style:font-family-asian="Arial" style:font-family-complex="Arial" fo:font-size="12pt"/>
    </style:style>
    <style:style style:parent-style-name="852" style:family="paragraph" style:name="P3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65">
      <style:text-properties fo:color="#1f1f1f" fo:font-family="Arial" style:font-family-asian="Arial" style:font-family-complex="Arial" fo:font-size="12pt" fo:font-weight="bold"/>
    </style:style>
    <style:style style:family="paragraph" style:name="P37">
      <style:paragraph-properties fo:line-height="115%" fo:margin-left="0cm" fo:margin-right="0cm" fo:text-indent="0cm" fo:margin-top="0pt" fo:margin-bottom="0pt" fo:border="none"/>
      <style:text-properties/>
    </style:style>
    <style:style style:family="text" style:name="T666">
      <style:text-properties fo:color="#1f1f1f" fo:font-family="Arial" style:font-family-asian="Arial" style:font-family-complex="Arial" fo:font-size="12pt"/>
    </style:style>
    <style:style style:parent-style-name="852" style:family="paragraph" style:name="P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67">
      <style:text-properties fo:color="#1f1f1f" fo:font-family="Arial" style:font-family-asian="Arial" style:font-family-complex="Arial" fo:font-size="12pt" fo:font-weight="bold"/>
    </style:style>
    <style:style style:family="paragraph" style:name="P39">
      <style:paragraph-properties fo:line-height="115%" fo:margin-left="0cm" fo:margin-right="0cm" fo:text-indent="0cm" fo:margin-top="0pt" fo:margin-bottom="0pt" fo:border="none"/>
      <style:text-properties/>
    </style:style>
    <style:style style:family="text" style:name="T668">
      <style:text-properties fo:color="#1f1f1f" fo:font-family="Arial" style:font-family-asian="Arial" style:font-family-complex="Arial" fo:font-size="12pt"/>
    </style:style>
    <style:style style:parent-style-name="852" style:family="paragraph" style:name="P4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69">
      <style:text-properties fo:color="#1f1f1f" fo:font-family="Arial" style:font-family-asian="Arial" style:font-family-complex="Arial" fo:font-size="12pt" fo:font-weight="bold"/>
    </style:style>
    <style:style style:family="paragraph" style:name="P41">
      <style:paragraph-properties fo:line-height="115%" fo:margin-left="0cm" fo:margin-right="0cm" fo:text-indent="0cm" fo:margin-top="0pt" fo:margin-bottom="0pt" fo:border="none"/>
      <style:text-properties/>
    </style:style>
    <style:style style:family="text" style:name="T670">
      <style:text-properties fo:color="#1f1f1f" fo:font-family="Arial" style:font-family-asian="Arial" style:font-family-complex="Arial" fo:font-size="12pt"/>
    </style:style>
    <style:style style:parent-style-name="852" style:family="paragraph" style:name="P4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71">
      <style:text-properties fo:color="#1f1f1f" fo:font-family="Arial" style:font-family-asian="Arial" style:font-family-complex="Arial" fo:font-size="12pt" fo:font-weight="bold"/>
    </style:style>
    <style:style style:family="paragraph" style:name="P43">
      <style:paragraph-properties fo:line-height="115%" fo:margin-left="0cm" fo:margin-right="0cm" fo:text-indent="0cm" fo:margin-top="0pt" fo:margin-bottom="0pt" fo:border="none"/>
      <style:text-properties/>
    </style:style>
    <style:style style:family="text" style:name="T672">
      <style:text-properties fo:color="#1f1f1f" fo:font-family="Arial" style:font-family-asian="Arial" style:font-family-complex="Arial" fo:font-size="12pt"/>
    </style:style>
    <style:style style:parent-style-name="851" style:family="paragraph" style:name="P4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73">
      <style:text-properties fo:color="#1f1f1f" fo:font-family="Arial" style:font-family-asian="Arial" style:font-family-complex="Arial" fo:font-size="14pt" fo:font-weight="bold"/>
    </style:style>
    <style:style style:parent-style-name="912" style:list-style-name="WWNum1" style:family="paragraph" style:name="P45">
      <style:paragraph-properties fo:line-height="115%" fo:margin-right="0cm" fo:margin-top="0pt" fo:margin-bottom="0pt" fo:border="none"/>
      <style:text-properties/>
    </style:style>
    <style:style style:family="text" style:name="T674">
      <style:text-properties fo:color="#1f1f1f" fo:font-family="Arial" style:font-family-asian="Arial" style:font-family-complex="Arial" fo:font-size="12pt"/>
    </style:style>
    <style:style style:parent-style-name="912" style:list-style-name="WWNum1" style:family="paragraph" style:name="P46">
      <style:paragraph-properties fo:line-height="115%" fo:margin-right="0cm" fo:margin-top="0pt" fo:margin-bottom="0pt" fo:border="none"/>
      <style:text-properties/>
    </style:style>
    <style:style style:family="text" style:name="T675">
      <style:text-properties fo:color="#1f1f1f" fo:font-family="Arial" style:font-family-asian="Arial" style:font-family-complex="Arial" fo:font-size="12pt"/>
    </style:style>
    <style:style style:parent-style-name="912" style:list-style-name="WWNum1" style:family="paragraph" style:name="P47">
      <style:paragraph-properties fo:line-height="115%" fo:margin-right="0cm" fo:margin-top="0pt" fo:margin-bottom="0pt" fo:border="none"/>
      <style:text-properties/>
    </style:style>
    <style:style style:family="text" style:name="T676">
      <style:text-properties fo:color="#1f1f1f" fo:font-family="Arial" style:font-family-asian="Arial" style:font-family-complex="Arial" fo:font-size="12pt"/>
    </style:style>
    <style:style style:parent-style-name="912" style:list-style-name="WWNum1" style:family="paragraph" style:name="P48">
      <style:paragraph-properties fo:line-height="115%" fo:margin-right="0cm" fo:margin-top="0pt" fo:margin-bottom="0pt" fo:border="none"/>
      <style:text-properties/>
    </style:style>
    <style:style style:family="text" style:name="T677">
      <style:text-properties fo:color="#1f1f1f" fo:font-family="Arial" style:font-family-asian="Arial" style:font-family-complex="Arial" fo:font-size="12pt"/>
    </style:style>
    <style:style style:family="paragraph" style:name="P49">
      <style:paragraph-properties/>
      <style:text-properties/>
    </style:style>
    <style:style style:parent-style-name="851" style:family="paragraph" style:name="P5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678">
      <style:text-properties fo:color="#1f1f1f" fo:font-family="Arial" style:font-family-asian="Arial" style:font-family-complex="Arial" fo:font-size="14pt" fo:font-weight="bold"/>
    </style:style>
    <style:style style:family="paragraph" style:name="P51">
      <style:paragraph-properties fo:line-height="115%" fo:margin-left="0cm" fo:margin-right="0cm" fo:text-indent="0cm" fo:margin-top="0pt" fo:margin-bottom="0pt" fo:border="none"/>
      <style:text-properties/>
    </style:style>
    <style:style style:family="text" style:name="T679">
      <style:text-properties fo:color="#1f1f1f" fo:font-family="Arial" style:font-family-asian="Arial" style:font-family-complex="Arial" fo:font-size="12pt"/>
    </style:style>
    <style:style style:parent-style-name="852" style:family="paragraph" style:name="P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80">
      <style:text-properties fo:color="#1f1f1f" fo:font-family="Arial" style:font-family-asian="Arial" style:font-family-complex="Arial" fo:font-size="12pt" fo:font-weight="bold"/>
    </style:style>
    <style:style style:family="paragraph" style:name="P53">
      <style:paragraph-properties fo:line-height="115%" fo:margin-left="0cm" fo:margin-right="0cm" fo:text-indent="0cm" fo:margin-top="0pt" fo:margin-bottom="0pt" fo:border="none"/>
      <style:text-properties/>
    </style:style>
    <style:style style:family="text" style:name="T681">
      <style:text-properties fo:color="#1f1f1f" fo:font-family="Arial" style:font-family-asian="Arial" style:font-family-complex="Arial" fo:font-size="12pt"/>
    </style:style>
    <style:style style:parent-style-name="852" style:family="paragraph" style:name="P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82">
      <style:text-properties fo:color="#1f1f1f" fo:font-family="Arial" style:font-family-asian="Arial" style:font-family-complex="Arial" fo:font-size="12pt" fo:font-weight="bold"/>
    </style:style>
    <style:style style:family="paragraph" style:name="P55">
      <style:paragraph-properties fo:line-height="115%" fo:margin-left="0cm" fo:margin-right="0cm" fo:text-indent="0cm" fo:margin-top="0pt" fo:margin-bottom="0pt" fo:border="none"/>
      <style:text-properties/>
    </style:style>
    <style:style style:family="text" style:name="T683">
      <style:text-properties fo:color="#1f1f1f" fo:font-family="Arial" style:font-family-asian="Arial" style:font-family-complex="Arial" fo:font-size="12pt"/>
    </style:style>
    <style:style style:parent-style-name="852" style:family="paragraph" style:name="P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84">
      <style:text-properties fo:color="#1f1f1f" fo:font-family="Arial" style:font-family-asian="Arial" style:font-family-complex="Arial" fo:font-size="12pt" fo:font-weight="bold"/>
    </style:style>
    <style:style style:family="paragraph" style:name="P57">
      <style:paragraph-properties fo:line-height="115%" fo:margin-left="0cm" fo:margin-right="0cm" fo:text-indent="0cm" fo:margin-top="0pt" fo:margin-bottom="0pt" fo:border="none"/>
      <style:text-properties/>
    </style:style>
    <style:style style:family="text" style:name="T685">
      <style:text-properties fo:color="#1f1f1f" fo:font-family="Arial" style:font-family-asian="Arial" style:font-family-complex="Arial" fo:font-size="12pt"/>
    </style:style>
    <style:style style:family="text" style:name="T686">
      <style:text-properties fo:color="#1f1f1f" fo:font-family="Arial" style:font-family-asian="Arial" style:font-family-complex="Arial" fo:font-size="12pt"/>
    </style:style>
    <style:style style:parent-style-name="852" style:family="paragraph" style:name="P5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87">
      <style:text-properties fo:color="#1f1f1f" fo:font-family="Arial" style:font-family-asian="Arial" style:font-family-complex="Arial" fo:font-size="12pt" fo:font-weight="bold"/>
    </style:style>
    <style:style style:family="paragraph" style:name="P59">
      <style:paragraph-properties fo:line-height="115%" fo:margin-left="0cm" fo:margin-right="0cm" fo:text-indent="0cm" fo:margin-top="0pt" fo:margin-bottom="0pt" fo:border="none"/>
      <style:text-properties/>
    </style:style>
    <style:style style:family="text" style:name="T688">
      <style:text-properties fo:color="#1f1f1f" fo:font-family="Arial" style:font-family-asian="Arial" style:font-family-complex="Arial" fo:font-size="12pt"/>
    </style:style>
    <style:style style:family="text" style:name="T689">
      <style:text-properties fo:color="#1f1f1f" fo:font-family="Arial" style:font-family-asian="Arial" style:font-family-complex="Arial" fo:font-size="12pt"/>
    </style:style>
    <style:style style:parent-style-name="851" style:family="paragraph" style:name="P6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90">
      <style:text-properties fo:color="#1f1f1f" fo:font-family="Arial" style:font-family-asian="Arial" style:font-family-complex="Arial" fo:font-size="14pt" fo:font-weight="bold"/>
    </style:style>
    <style:style style:parent-style-name="912" style:list-style-name="WWNum2" style:family="paragraph" style:name="P61">
      <style:paragraph-properties fo:line-height="115%" fo:margin-right="0cm" fo:margin-top="0pt" fo:margin-bottom="0pt" fo:border="none"/>
      <style:text-properties/>
    </style:style>
    <style:style style:family="text" style:name="T691">
      <style:text-properties fo:color="#1f1f1f" fo:font-family="Arial" style:font-family-asian="Arial" style:font-family-complex="Arial" fo:font-size="12pt"/>
    </style:style>
    <style:style style:parent-style-name="912" style:list-style-name="WWNum2" style:family="paragraph" style:name="P62">
      <style:paragraph-properties fo:line-height="115%" fo:margin-right="0cm" fo:margin-top="0pt" fo:margin-bottom="0pt" fo:border="none"/>
      <style:text-properties/>
    </style:style>
    <style:style style:family="text" style:name="T692">
      <style:text-properties fo:color="#1f1f1f" fo:font-family="Arial" style:font-family-asian="Arial" style:font-family-complex="Arial" fo:font-size="12pt"/>
    </style:style>
    <style:style style:parent-style-name="912" style:list-style-name="WWNum2" style:family="paragraph" style:name="P63">
      <style:paragraph-properties fo:line-height="115%" fo:margin-right="0cm" fo:margin-top="0pt" fo:margin-bottom="0pt" fo:border="none"/>
      <style:text-properties/>
    </style:style>
    <style:style style:family="text" style:name="T693">
      <style:text-properties fo:color="#1f1f1f" fo:font-family="Arial" style:font-family-asian="Arial" style:font-family-complex="Arial" fo:font-size="12pt"/>
    </style:style>
    <style:style style:parent-style-name="912" style:list-style-name="WWNum2" style:family="paragraph" style:name="P64">
      <style:paragraph-properties fo:line-height="115%" fo:margin-right="0cm" fo:margin-top="0pt" fo:margin-bottom="0pt" fo:border="none"/>
      <style:text-properties/>
    </style:style>
    <style:style style:family="text" style:name="T694">
      <style:text-properties fo:color="#1f1f1f" fo:font-family="Arial" style:font-family-asian="Arial" style:font-family-complex="Arial" fo:font-size="12pt"/>
    </style:style>
    <style:style style:family="paragraph" style:name="P65">
      <style:paragraph-properties/>
      <style:text-properties/>
    </style:style>
    <style:style style:parent-style-name="851" style:family="paragraph" style:name="P6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695">
      <style:text-properties fo:color="#1f1f1f" fo:font-family="Arial" style:font-family-asian="Arial" style:font-family-complex="Arial" fo:font-size="14pt" fo:font-weight="bold"/>
    </style:style>
    <style:style style:family="paragraph" style:name="P67">
      <style:paragraph-properties fo:line-height="115%" fo:margin-left="0cm" fo:margin-right="0cm" fo:text-indent="0cm" fo:margin-top="0pt" fo:margin-bottom="0pt" fo:border="none"/>
      <style:text-properties/>
    </style:style>
    <style:style style:family="text" style:name="T696">
      <style:text-properties fo:color="#1f1f1f" fo:font-family="Arial" style:font-family-asian="Arial" style:font-family-complex="Arial" fo:font-size="12pt"/>
    </style:style>
    <style:style style:parent-style-name="852" style:family="paragraph" style:name="P6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97">
      <style:text-properties fo:color="#1f1f1f" fo:font-family="Arial" style:font-family-asian="Arial" style:font-family-complex="Arial" fo:font-size="12pt" fo:font-weight="bold"/>
    </style:style>
    <style:style style:family="paragraph" style:name="P69">
      <style:paragraph-properties fo:line-height="115%" fo:margin-left="0cm" fo:margin-right="0cm" fo:text-indent="0cm" fo:margin-top="0pt" fo:margin-bottom="0pt" fo:border="none"/>
      <style:text-properties/>
    </style:style>
    <style:style style:family="text" style:name="T698">
      <style:text-properties fo:color="#1f1f1f" fo:font-family="Arial" style:font-family-asian="Arial" style:font-family-complex="Arial" fo:font-size="12pt"/>
    </style:style>
    <style:style style:family="text" style:name="T699">
      <style:text-properties fo:color="#1f1f1f" fo:font-family="Arial" style:font-family-asian="Arial" style:font-family-complex="Arial" fo:font-size="12pt"/>
    </style:style>
    <style:style style:parent-style-name="852" style:family="paragraph" style:name="P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00">
      <style:text-properties fo:color="#1f1f1f" fo:font-family="Arial" style:font-family-asian="Arial" style:font-family-complex="Arial" fo:font-size="12pt" fo:font-weight="bold"/>
    </style:style>
    <style:style style:family="paragraph" style:name="P71">
      <style:paragraph-properties fo:line-height="115%" fo:margin-left="0cm" fo:margin-right="0cm" fo:text-indent="0cm" fo:margin-top="0pt" fo:margin-bottom="0pt" fo:border="none"/>
      <style:text-properties/>
    </style:style>
    <style:style style:family="text" style:name="T701">
      <style:text-properties fo:color="#1f1f1f" fo:font-family="Arial" style:font-family-asian="Arial" style:font-family-complex="Arial" fo:font-size="12pt"/>
    </style:style>
    <style:style style:family="text" style:name="T702">
      <style:text-properties fo:color="#1f1f1f" fo:font-family="Arial" style:font-family-asian="Arial" style:font-family-complex="Arial" fo:font-size="12pt"/>
    </style:style>
    <style:style style:parent-style-name="852" style:family="paragraph" style:name="P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03">
      <style:text-properties fo:color="#1f1f1f" fo:font-family="Arial" style:font-family-asian="Arial" style:font-family-complex="Arial" fo:font-size="12pt" fo:font-weight="bold"/>
    </style:style>
    <style:style style:family="paragraph" style:name="P73">
      <style:paragraph-properties fo:line-height="115%" fo:margin-left="0cm" fo:margin-right="0cm" fo:text-indent="0cm" fo:margin-top="0pt" fo:margin-bottom="0pt" fo:border="none"/>
      <style:text-properties/>
    </style:style>
    <style:style style:family="text" style:name="T704">
      <style:text-properties fo:color="#1f1f1f" fo:font-family="Arial" style:font-family-asian="Arial" style:font-family-complex="Arial" fo:font-size="12pt"/>
    </style:style>
    <style:style style:family="text" style:name="T705">
      <style:text-properties fo:color="#1f1f1f" fo:font-family="Arial" style:font-family-asian="Arial" style:font-family-complex="Arial" fo:font-size="12pt"/>
    </style:style>
    <style:style style:parent-style-name="852" style:family="paragraph" style:name="P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06">
      <style:text-properties fo:color="#1f1f1f" fo:font-family="Arial" style:font-family-asian="Arial" style:font-family-complex="Arial" fo:font-size="12pt" fo:font-weight="bold"/>
    </style:style>
    <style:style style:family="paragraph" style:name="P75">
      <style:paragraph-properties fo:line-height="115%" fo:margin-left="0cm" fo:margin-right="0cm" fo:text-indent="0cm" fo:margin-top="0pt" fo:margin-bottom="0pt" fo:border="none"/>
      <style:text-properties/>
    </style:style>
    <style:style style:family="text" style:name="T707">
      <style:text-properties fo:color="#1f1f1f" fo:font-family="Arial" style:font-family-asian="Arial" style:font-family-complex="Arial" fo:font-size="12pt"/>
    </style:style>
    <style:style style:family="text" style:name="T708">
      <style:text-properties fo:color="#1f1f1f" fo:font-family="Arial" style:font-family-asian="Arial" style:font-family-complex="Arial" fo:font-size="12pt"/>
    </style:style>
    <style:style style:parent-style-name="851" style:family="paragraph" style:name="P7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09">
      <style:text-properties fo:color="#1f1f1f" fo:font-family="Arial" style:font-family-asian="Arial" style:font-family-complex="Arial" fo:font-size="14pt" fo:font-weight="bold"/>
    </style:style>
    <style:style style:parent-style-name="912" style:list-style-name="WWNum3" style:family="paragraph" style:name="P77">
      <style:paragraph-properties fo:line-height="115%" fo:margin-right="0cm" fo:margin-top="0pt" fo:margin-bottom="0pt" fo:border="none"/>
      <style:text-properties/>
    </style:style>
    <style:style style:family="text" style:name="T710">
      <style:text-properties fo:color="#1f1f1f" fo:font-family="Arial" style:font-family-asian="Arial" style:font-family-complex="Arial" fo:font-size="12pt"/>
    </style:style>
    <style:style style:parent-style-name="912" style:list-style-name="WWNum3" style:family="paragraph" style:name="P78">
      <style:paragraph-properties fo:line-height="115%" fo:margin-right="0cm" fo:margin-top="0pt" fo:margin-bottom="0pt" fo:border="none"/>
      <style:text-properties/>
    </style:style>
    <style:style style:family="text" style:name="T711">
      <style:text-properties fo:color="#1f1f1f" fo:font-family="Arial" style:font-family-asian="Arial" style:font-family-complex="Arial" fo:font-size="12pt"/>
    </style:style>
    <style:style style:parent-style-name="912" style:list-style-name="WWNum3" style:family="paragraph" style:name="P79">
      <style:paragraph-properties fo:line-height="115%" fo:margin-right="0cm" fo:margin-top="0pt" fo:margin-bottom="0pt" fo:border="none"/>
      <style:text-properties/>
    </style:style>
    <style:style style:family="text" style:name="T712">
      <style:text-properties fo:color="#1f1f1f" fo:font-family="Arial" style:font-family-asian="Arial" style:font-family-complex="Arial" fo:font-size="12pt"/>
    </style:style>
    <style:style style:parent-style-name="912" style:list-style-name="WWNum3" style:family="paragraph" style:name="P80">
      <style:paragraph-properties fo:line-height="115%" fo:margin-right="0cm" fo:margin-top="0pt" fo:margin-bottom="0pt" fo:border="none"/>
      <style:text-properties/>
    </style:style>
    <style:style style:family="text" style:name="T713">
      <style:text-properties fo:color="#1f1f1f" fo:font-family="Arial" style:font-family-asian="Arial" style:font-family-complex="Arial" fo:font-size="12pt"/>
    </style:style>
    <style:style style:family="paragraph" style:name="P81">
      <style:paragraph-properties/>
      <style:text-properties/>
    </style:style>
    <style:style style:parent-style-name="851" style:family="paragraph" style:name="P8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14">
      <style:text-properties fo:color="#1f1f1f" fo:font-family="Arial" style:font-family-asian="Arial" style:font-family-complex="Arial" fo:font-size="14pt" fo:font-weight="bold"/>
    </style:style>
    <style:style style:family="paragraph" style:name="P83">
      <style:paragraph-properties fo:line-height="115%" fo:margin-left="0cm" fo:margin-right="0cm" fo:text-indent="0cm" fo:margin-top="0pt" fo:margin-bottom="0pt" fo:border="none"/>
      <style:text-properties/>
    </style:style>
    <style:style style:family="text" style:name="T715">
      <style:text-properties fo:color="#1f1f1f" fo:font-family="Arial" style:font-family-asian="Arial" style:font-family-complex="Arial" fo:font-size="12pt"/>
    </style:style>
    <style:style style:family="paragraph" style:name="P84">
      <style:paragraph-properties fo:line-height="115%" fo:margin-left="0cm" fo:margin-right="0cm" fo:text-indent="0cm" fo:margin-top="0pt" fo:margin-bottom="0pt" fo:border="none"/>
      <style:text-properties/>
    </style:style>
    <style:style style:family="text" style:name="T716">
      <style:text-properties fo:color="#1f1f1f" fo:font-family="Arial" style:font-family-asian="Arial" style:font-family-complex="Arial" fo:font-size="12pt"/>
    </style:style>
    <style:style style:family="text" style:name="T717">
      <style:text-properties fo:color="#1f1f1f" fo:font-family="Arial" style:font-family-asian="Arial" style:font-family-complex="Arial" fo:font-size="12pt"/>
    </style:style>
    <style:style style:family="paragraph" style:name="P85">
      <style:paragraph-properties fo:line-height="115%" fo:margin-left="0cm" fo:margin-right="0cm" fo:text-indent="0cm" fo:margin-top="0pt" fo:margin-bottom="0pt" fo:border="none"/>
      <style:text-properties/>
    </style:style>
    <style:style style:family="text" style:name="T718">
      <style:text-properties fo:color="#1f1f1f" fo:font-family="Arial" style:font-family-asian="Arial" style:font-family-complex="Arial" fo:font-size="12pt"/>
    </style:style>
    <style:style style:family="paragraph" style:name="P86">
      <style:paragraph-properties fo:line-height="115%" fo:margin-left="0cm" fo:margin-right="0cm" fo:text-indent="0cm" fo:margin-top="0pt" fo:margin-bottom="0pt" fo:border="none"/>
      <style:text-properties/>
    </style:style>
    <style:style style:family="text" style:name="T719">
      <style:text-properties fo:color="#1f1f1f" fo:font-family="Arial" style:font-family-asian="Arial" style:font-family-complex="Arial" fo:font-size="12pt"/>
    </style:style>
    <style:style style:family="text" style:name="T720">
      <style:text-properties fo:color="#1f1f1f" fo:font-family="Arial" style:font-family-asian="Arial" style:font-family-complex="Arial" fo:font-size="12pt"/>
    </style:style>
    <style:style style:family="paragraph" style:name="P87">
      <style:paragraph-properties fo:line-height="115%" fo:margin-left="0cm" fo:margin-right="0cm" fo:text-indent="0cm" fo:margin-top="0pt" fo:margin-bottom="0pt" fo:border="none"/>
      <style:text-properties/>
    </style:style>
    <style:style style:family="text" style:name="T721">
      <style:text-properties fo:color="#1f1f1f" fo:font-family="Arial" style:font-family-asian="Arial" style:font-family-complex="Arial" fo:font-size="12pt"/>
    </style:style>
    <style:style style:parent-style-name="851" style:family="paragraph" style:name="P8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22">
      <style:text-properties fo:color="#1f1f1f" fo:font-family="Arial" style:font-family-asian="Arial" style:font-family-complex="Arial" fo:font-size="14pt" fo:font-weight="bold"/>
    </style:style>
    <style:style style:parent-style-name="912" style:list-style-name="WWNum4" style:family="paragraph" style:name="P89">
      <style:paragraph-properties fo:line-height="115%" fo:margin-right="0cm" fo:margin-top="0pt" fo:margin-bottom="0pt" fo:border="none"/>
      <style:text-properties/>
    </style:style>
    <style:style style:family="text" style:name="T723">
      <style:text-properties fo:color="#1f1f1f" fo:font-family="Arial" style:font-family-asian="Arial" style:font-family-complex="Arial" fo:font-size="12pt"/>
    </style:style>
    <style:style style:parent-style-name="912" style:list-style-name="WWNum4" style:family="paragraph" style:name="P90">
      <style:paragraph-properties fo:line-height="115%" fo:margin-right="0cm" fo:margin-top="0pt" fo:margin-bottom="0pt" fo:border="none"/>
      <style:text-properties/>
    </style:style>
    <style:style style:family="text" style:name="T724">
      <style:text-properties fo:color="#1f1f1f" fo:font-family="Arial" style:font-family-asian="Arial" style:font-family-complex="Arial" fo:font-size="12pt"/>
    </style:style>
    <style:style style:parent-style-name="912" style:list-style-name="WWNum4" style:family="paragraph" style:name="P91">
      <style:paragraph-properties fo:line-height="115%" fo:margin-right="0cm" fo:margin-top="0pt" fo:margin-bottom="0pt" fo:border="none"/>
      <style:text-properties/>
    </style:style>
    <style:style style:family="text" style:name="T725">
      <style:text-properties fo:color="#1f1f1f" fo:font-family="Arial" style:font-family-asian="Arial" style:font-family-complex="Arial" fo:font-size="12pt"/>
    </style:style>
    <style:style style:parent-style-name="912" style:list-style-name="WWNum4" style:family="paragraph" style:name="P92">
      <style:paragraph-properties fo:line-height="115%" fo:margin-right="0cm" fo:margin-top="0pt" fo:margin-bottom="0pt" fo:border="none"/>
      <style:text-properties/>
    </style:style>
    <style:style style:family="text" style:name="T726">
      <style:text-properties fo:color="#1f1f1f" fo:font-family="Arial" style:font-family-asian="Arial" style:font-family-complex="Arial" fo:font-size="12pt"/>
    </style:style>
    <style:style style:family="paragraph" style:name="P93">
      <style:paragraph-properties/>
      <style:text-properties/>
    </style:style>
    <style:style style:family="paragraph" style:name="P94">
      <style:paragraph-properties fo:line-height="115%" fo:margin-left="0cm" fo:margin-right="0cm" fo:text-indent="0cm" fo:margin-top="0pt" fo:margin-bottom="0pt" fo:break-before="page" fo:border="none"/>
      <style:text-properties/>
    </style:style>
    <style:style style:family="text" style:name="T727">
      <style:text-properties fo:color="#1f1f1f" fo:font-family="Arial" style:font-family-asian="Arial" style:font-family-complex="Arial" fo:font-size="12pt"/>
    </style:style>
    <style:style style:parent-style-name="851" style:family="paragraph" style:name="P9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28">
      <style:text-properties fo:color="#1f1f1f" fo:font-family="Arial" style:font-family-asian="Arial" style:font-family-complex="Arial" fo:font-size="14pt" fo:font-weight="bold"/>
    </style:style>
    <style:style style:family="paragraph" style:name="P96">
      <style:paragraph-properties fo:line-height="115%" fo:margin-left="0cm" fo:margin-right="0cm" fo:text-indent="0cm" fo:margin-top="0pt" fo:margin-bottom="0pt" fo:border="none"/>
      <style:text-properties/>
    </style:style>
    <style:style style:family="text" style:name="T729">
      <style:text-properties fo:color="#1f1f1f" fo:font-family="Arial" style:font-family-asian="Arial" style:font-family-complex="Arial" fo:font-size="12pt"/>
    </style:style>
    <style:style style:parent-style-name="852" style:family="paragraph" style:name="P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0">
      <style:text-properties fo:color="#1f1f1f" fo:font-family="Arial" style:font-family-asian="Arial" style:font-family-complex="Arial" fo:font-size="12pt" fo:font-weight="bold"/>
    </style:style>
    <style:style style:family="paragraph" style:name="P98">
      <style:paragraph-properties fo:line-height="115%" fo:margin-left="0cm" fo:margin-right="0cm" fo:text-indent="0cm" fo:margin-top="0pt" fo:margin-bottom="0pt" fo:border="none"/>
      <style:text-properties/>
    </style:style>
    <style:style style:family="text" style:name="T731">
      <style:text-properties fo:color="#1f1f1f" fo:font-family="Arial" style:font-family-asian="Arial" style:font-family-complex="Arial" fo:font-size="12pt"/>
    </style:style>
    <style:style style:parent-style-name="852" style:family="paragraph" style:name="P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2">
      <style:text-properties fo:color="#1f1f1f" fo:font-family="Arial" style:font-family-asian="Arial" style:font-family-complex="Arial" fo:font-size="12pt" fo:font-weight="bold"/>
    </style:style>
    <style:style style:family="paragraph" style:name="P100">
      <style:paragraph-properties fo:line-height="115%" fo:margin-left="0cm" fo:margin-right="0cm" fo:text-indent="0cm" fo:margin-top="0pt" fo:margin-bottom="0pt" fo:border="none"/>
      <style:text-properties/>
    </style:style>
    <style:style style:family="text" style:name="T733">
      <style:text-properties fo:color="#1f1f1f" fo:font-family="Arial" style:font-family-asian="Arial" style:font-family-complex="Arial" fo:font-size="12pt"/>
    </style:style>
    <style:style style:parent-style-name="852" style:family="paragraph" style:name="P1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4">
      <style:text-properties fo:color="#1f1f1f" fo:font-family="Arial" style:font-family-asian="Arial" style:font-family-complex="Arial" fo:font-size="12pt" fo:font-weight="bold"/>
    </style:style>
    <style:style style:family="paragraph" style:name="P102">
      <style:paragraph-properties fo:line-height="115%" fo:margin-left="0cm" fo:margin-right="0cm" fo:text-indent="0cm" fo:margin-top="0pt" fo:margin-bottom="0pt" fo:border="none"/>
      <style:text-properties/>
    </style:style>
    <style:style style:family="text" style:name="T735">
      <style:text-properties fo:color="#1f1f1f" fo:font-family="Arial" style:font-family-asian="Arial" style:font-family-complex="Arial" fo:font-size="12pt"/>
    </style:style>
    <style:style style:parent-style-name="912" style:list-style-name="WWNum5" style:family="paragraph" style:name="P103">
      <style:paragraph-properties fo:line-height="115%" fo:margin-right="0cm" fo:margin-top="0pt" fo:margin-bottom="0pt" fo:border="none"/>
      <style:text-properties/>
    </style:style>
    <style:style style:family="text" style:name="T736">
      <style:text-properties fo:color="#1f1f1f" fo:font-family="Arial" style:font-family-asian="Arial" style:font-family-complex="Arial" fo:font-size="12pt"/>
    </style:style>
    <style:style style:parent-style-name="912" style:list-style-name="WWNum5" style:family="paragraph" style:name="P104">
      <style:paragraph-properties fo:line-height="115%" fo:margin-right="0cm" fo:margin-top="0pt" fo:margin-bottom="0pt" fo:border="none"/>
      <style:text-properties/>
    </style:style>
    <style:style style:family="text" style:name="T737">
      <style:text-properties fo:color="#1f1f1f" fo:font-family="Arial" style:font-family-asian="Arial" style:font-family-complex="Arial" fo:font-size="12pt"/>
    </style:style>
    <style:style style:parent-style-name="912" style:list-style-name="WWNum5" style:family="paragraph" style:name="P105">
      <style:paragraph-properties fo:line-height="115%" fo:margin-right="0cm" fo:margin-top="0pt" fo:margin-bottom="0pt" fo:border="none"/>
      <style:text-properties/>
    </style:style>
    <style:style style:family="text" style:name="T738">
      <style:text-properties fo:color="#1f1f1f" fo:font-family="Arial" style:font-family-asian="Arial" style:font-family-complex="Arial" fo:font-size="12pt"/>
    </style:style>
    <style:style style:parent-style-name="852" style:family="paragraph" style:name="P10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9">
      <style:text-properties fo:color="#1f1f1f" fo:font-family="Arial" style:font-family-asian="Arial" style:font-family-complex="Arial" fo:font-size="12pt" fo:font-weight="bold"/>
    </style:style>
    <style:style style:family="paragraph" style:name="P107">
      <style:paragraph-properties fo:line-height="115%" fo:margin-left="0cm" fo:margin-right="0cm" fo:text-indent="0cm" fo:margin-top="0pt" fo:margin-bottom="0pt" fo:border="none"/>
      <style:text-properties/>
    </style:style>
    <style:style style:family="text" style:name="T740">
      <style:text-properties fo:color="#1f1f1f" fo:font-family="Arial" style:font-family-asian="Arial" style:font-family-complex="Arial" fo:font-size="12pt"/>
    </style:style>
    <style:style style:family="table" style:name="ta1">
      <style:paragraph-properties fo:line-height="100%" fo:margin-bottom="0pt"/>
      <style:table-properties style:width="10.63cm" fo:margin-left="0cm" table:align="left" style:use-optimal-column-width="true"/>
    </style:style>
    <style:style style:family="table-column" style:name="co1">
      <style:table-column-properties style:column-width="1.849cm" style:use-optimal-column-width="true"/>
    </style:style>
    <style:style style:family="table-column" style:name="co2">
      <style:table-column-properties style:column-width="8.785cm" style:use-optimal-column-width="true"/>
    </style:style>
    <style:style style:family="table-row" style:name="ro1">
      <style:table-row-properties/>
    </style:style>
    <style:style style:family="table-cell" style:name="ce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8">
      <style:paragraph-properties fo:line-height="100%" fo:margin-top="0pt" fo:margin-bottom="0pt"/>
      <style:text-properties/>
    </style:style>
    <style:style style:family="text" style:name="T741">
      <style:text-properties fo:color="#1f1f1f" fo:font-family="Arial" style:font-family-asian="Arial" style:font-family-complex="Arial" fo:font-size="12pt" fo:font-weight="bold"/>
    </style:style>
    <style:style style:family="table-cell" style:name="ce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9">
      <style:paragraph-properties fo:line-height="100%" fo:margin-top="0pt" fo:margin-bottom="0pt"/>
      <style:text-properties/>
    </style:style>
    <style:style style:family="text" style:name="T742">
      <style:text-properties fo:color="#1f1f1f" fo:font-family="Arial" style:font-family-asian="Arial" style:font-family-complex="Arial" fo:font-size="12pt" fo:font-weight="bold"/>
    </style:style>
    <style:style style:family="table-row" style:name="ro2">
      <style:table-row-properties/>
    </style:style>
    <style:style style:family="table-cell" style:name="ce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0">
      <style:paragraph-properties fo:line-height="100%" fo:margin-top="0pt" fo:margin-bottom="0pt"/>
      <style:text-properties/>
    </style:style>
    <style:style style:family="text" style:name="T743">
      <style:text-properties fo:color="#1f1f1f" fo:font-family="Arial" style:font-family-asian="Arial" style:font-family-complex="Arial" fo:font-size="12pt"/>
    </style:style>
    <style:style style:family="table-cell" style:name="ce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1">
      <style:paragraph-properties fo:line-height="100%" fo:margin-top="0pt" fo:margin-bottom="0pt"/>
      <style:text-properties/>
    </style:style>
    <style:style style:family="text" style:name="T744">
      <style:text-properties fo:color="#1f1f1f" fo:font-family="Arial" style:font-family-asian="Arial" style:font-family-complex="Arial" fo:font-size="12pt"/>
    </style:style>
    <style:style style:family="table-row" style:name="ro3">
      <style:table-row-properties/>
    </style:style>
    <style:style style:family="table-cell" style:name="ce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2">
      <style:paragraph-properties fo:line-height="100%" fo:margin-top="0pt" fo:margin-bottom="0pt"/>
      <style:text-properties/>
    </style:style>
    <style:style style:family="text" style:name="T745">
      <style:text-properties fo:color="#1f1f1f" fo:font-family="Arial" style:font-family-asian="Arial" style:font-family-complex="Arial" fo:font-size="12pt"/>
    </style:style>
    <style:style style:family="table-cell" style:name="ce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3">
      <style:paragraph-properties fo:line-height="100%" fo:margin-top="0pt" fo:margin-bottom="0pt"/>
      <style:text-properties/>
    </style:style>
    <style:style style:family="text" style:name="T746">
      <style:text-properties fo:color="#1f1f1f" fo:font-family="Arial" style:font-family-asian="Arial" style:font-family-complex="Arial" fo:font-size="12pt"/>
    </style:style>
    <style:style style:family="table-row" style:name="ro4">
      <style:table-row-properties/>
    </style:style>
    <style:style style:family="table-cell" style:name="ce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4">
      <style:paragraph-properties fo:line-height="100%" fo:margin-top="0pt" fo:margin-bottom="0pt"/>
      <style:text-properties/>
    </style:style>
    <style:style style:family="text" style:name="T747">
      <style:text-properties fo:color="#1f1f1f" fo:font-family="Arial" style:font-family-asian="Arial" style:font-family-complex="Arial" fo:font-size="12pt"/>
    </style:style>
    <style:style style:family="table-cell" style:name="ce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
      <style:paragraph-properties fo:line-height="100%" fo:margin-top="0pt" fo:margin-bottom="0pt"/>
      <style:text-properties/>
    </style:style>
    <style:style style:family="text" style:name="T748">
      <style:text-properties fo:color="#1f1f1f" fo:font-family="Arial" style:font-family-asian="Arial" style:font-family-complex="Arial" fo:font-size="12pt"/>
    </style:style>
    <style:style style:parent-style-name="851" style:family="paragraph" style:name="P11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49">
      <style:text-properties fo:color="#1f1f1f" fo:font-family="Arial" style:font-family-asian="Arial" style:font-family-complex="Arial" fo:font-size="14pt" fo:font-weight="bold"/>
    </style:style>
    <style:style style:parent-style-name="912" style:list-style-name="WWNum5" style:family="paragraph" style:name="P117">
      <style:paragraph-properties fo:line-height="115%" fo:margin-right="0cm" fo:margin-top="0pt" fo:margin-bottom="0pt" fo:border="none"/>
      <style:text-properties/>
    </style:style>
    <style:style style:family="text" style:name="T750">
      <style:text-properties fo:color="#1f1f1f" fo:font-family="Arial" style:font-family-asian="Arial" style:font-family-complex="Arial" fo:font-size="12pt"/>
    </style:style>
    <style:style style:parent-style-name="912" style:list-style-name="WWNum5" style:family="paragraph" style:name="P118">
      <style:paragraph-properties fo:line-height="115%" fo:margin-right="0cm" fo:margin-top="0pt" fo:margin-bottom="0pt" fo:border="none"/>
      <style:text-properties/>
    </style:style>
    <style:style style:family="text" style:name="T751">
      <style:text-properties fo:color="#1f1f1f" fo:font-family="Arial" style:font-family-asian="Arial" style:font-family-complex="Arial" fo:font-size="12pt"/>
    </style:style>
    <style:style style:parent-style-name="912" style:list-style-name="WWNum5" style:family="paragraph" style:name="P119">
      <style:paragraph-properties fo:line-height="115%" fo:margin-right="0cm" fo:margin-top="0pt" fo:margin-bottom="0pt" fo:border="none"/>
      <style:text-properties/>
    </style:style>
    <style:style style:family="text" style:name="T752">
      <style:text-properties fo:color="#1f1f1f" fo:font-family="Arial" style:font-family-asian="Arial" style:font-family-complex="Arial" fo:font-size="12pt"/>
    </style:style>
    <style:style style:parent-style-name="912" style:list-style-name="WWNum5" style:family="paragraph" style:name="P120">
      <style:paragraph-properties fo:line-height="115%" fo:margin-right="0cm" fo:margin-top="0pt" fo:margin-bottom="0pt" fo:border="none"/>
      <style:text-properties/>
    </style:style>
    <style:style style:family="text" style:name="T753">
      <style:text-properties fo:color="#1f1f1f" fo:font-family="Arial" style:font-family-asian="Arial" style:font-family-complex="Arial" fo:font-size="12pt"/>
    </style:style>
    <style:style style:family="paragraph" style:name="P121">
      <style:paragraph-properties/>
      <style:text-properties/>
    </style:style>
    <style:style style:family="paragraph" style:name="P122">
      <style:paragraph-properties fo:line-height="115%" fo:margin-left="0cm" fo:margin-right="0cm" fo:text-indent="0cm" fo:margin-top="0pt" fo:margin-bottom="0pt" fo:break-before="page" fo:border="none"/>
      <style:text-properties/>
    </style:style>
    <style:style style:family="text" style:name="T754">
      <style:text-properties fo:color="#1f1f1f" fo:font-family="Arial" style:font-family-asian="Arial" style:font-family-complex="Arial" fo:font-size="12pt"/>
    </style:style>
    <style:style style:parent-style-name="851" style:family="paragraph" style:name="P12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55">
      <style:text-properties fo:color="#1f1f1f" fo:font-family="Arial" style:font-family-asian="Arial" style:font-family-complex="Arial" fo:font-size="14pt" fo:font-weight="bold"/>
    </style:style>
    <style:style style:family="paragraph" style:name="P124">
      <style:paragraph-properties fo:line-height="115%" fo:margin-left="0cm" fo:margin-right="0cm" fo:text-indent="0cm" fo:margin-top="0pt" fo:margin-bottom="0pt" fo:border="none"/>
      <style:text-properties/>
    </style:style>
    <style:style style:family="text" style:name="T756">
      <style:text-properties fo:color="#1f1f1f" fo:font-family="Arial" style:font-family-asian="Arial" style:font-family-complex="Arial" fo:font-size="12pt"/>
    </style:style>
    <style:style style:parent-style-name="852" style:family="paragraph" style:name="P12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57">
      <style:text-properties fo:color="#1f1f1f" fo:font-family="Arial" style:font-family-asian="Arial" style:font-family-complex="Arial" fo:font-size="12pt" fo:font-weight="bold"/>
    </style:style>
    <style:style style:family="paragraph" style:name="P126">
      <style:paragraph-properties fo:line-height="115%" fo:margin-left="0cm" fo:margin-right="0cm" fo:text-indent="0cm" fo:margin-top="0pt" fo:margin-bottom="0pt" fo:border="none"/>
      <style:text-properties/>
    </style:style>
    <style:style style:family="text" style:name="T758">
      <style:text-properties fo:color="#1f1f1f" fo:font-family="Arial" style:font-family-asian="Arial" style:font-family-complex="Arial" fo:font-size="12pt"/>
    </style:style>
    <style:style style:parent-style-name="852" style:family="paragraph" style:name="P12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59">
      <style:text-properties fo:color="#1f1f1f" fo:font-family="Arial" style:font-family-asian="Arial" style:font-family-complex="Arial" fo:font-size="12pt" fo:font-weight="bold"/>
    </style:style>
    <style:style style:family="paragraph" style:name="P128">
      <style:paragraph-properties fo:line-height="115%" fo:margin-left="0cm" fo:margin-right="0cm" fo:text-indent="0cm" fo:margin-top="0pt" fo:margin-bottom="0pt" fo:border="none"/>
      <style:text-properties/>
    </style:style>
    <style:style style:family="text" style:name="T760">
      <style:text-properties fo:color="#1f1f1f" fo:font-family="Arial" style:font-family-asian="Arial" style:font-family-complex="Arial" fo:font-size="12pt"/>
    </style:style>
    <style:style style:parent-style-name="852" style:family="paragraph" style:name="P12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1">
      <style:text-properties fo:color="#1f1f1f" fo:font-family="Arial" style:font-family-asian="Arial" style:font-family-complex="Arial" fo:font-size="12pt" fo:font-weight="bold"/>
    </style:style>
    <style:style style:family="paragraph" style:name="P130">
      <style:paragraph-properties fo:line-height="115%" fo:margin-left="0cm" fo:margin-right="0cm" fo:text-indent="0cm" fo:margin-top="0pt" fo:margin-bottom="0pt" fo:border="none"/>
      <style:text-properties/>
    </style:style>
    <style:style style:family="text" style:name="T762">
      <style:text-properties fo:color="#1f1f1f" fo:font-family="Arial" style:font-family-asian="Arial" style:font-family-complex="Arial" fo:font-size="12pt"/>
    </style:style>
    <style:style style:parent-style-name="852" style:family="paragraph" style:name="P13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3">
      <style:text-properties fo:color="#1f1f1f" fo:font-family="Arial" style:font-family-asian="Arial" style:font-family-complex="Arial" fo:font-size="12pt" fo:font-weight="bold"/>
    </style:style>
    <style:style style:family="paragraph" style:name="P132">
      <style:paragraph-properties fo:line-height="115%" fo:margin-left="0cm" fo:margin-right="0cm" fo:text-indent="0cm" fo:margin-top="0pt" fo:margin-bottom="0pt" fo:border="none"/>
      <style:text-properties/>
    </style:style>
    <style:style style:family="text" style:name="T764">
      <style:text-properties fo:color="#1f1f1f" fo:font-family="Arial" style:font-family-asian="Arial" style:font-family-complex="Arial" fo:font-size="12pt"/>
    </style:style>
    <style:style style:parent-style-name="851" style:family="paragraph" style:name="P1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65">
      <style:text-properties fo:color="#1f1f1f" fo:font-family="Arial" style:font-family-asian="Arial" style:font-family-complex="Arial" fo:font-size="14pt" fo:font-weight="bold"/>
    </style:style>
    <style:style style:parent-style-name="912" style:list-style-name="WWNum6" style:family="paragraph" style:name="P134">
      <style:paragraph-properties fo:line-height="115%" fo:margin-right="0cm" fo:margin-top="0pt" fo:margin-bottom="0pt" fo:border="none"/>
      <style:text-properties/>
    </style:style>
    <style:style style:family="text" style:name="T766">
      <style:text-properties fo:color="#1f1f1f" fo:font-family="Arial" style:font-family-asian="Arial" style:font-family-complex="Arial" fo:font-size="12pt"/>
    </style:style>
    <style:style style:parent-style-name="912" style:list-style-name="WWNum6" style:family="paragraph" style:name="P135">
      <style:paragraph-properties fo:line-height="115%" fo:margin-right="0cm" fo:margin-top="0pt" fo:margin-bottom="0pt" fo:border="none"/>
      <style:text-properties/>
    </style:style>
    <style:style style:family="text" style:name="T767">
      <style:text-properties fo:color="#1f1f1f" fo:font-family="Arial" style:font-family-asian="Arial" style:font-family-complex="Arial" fo:font-size="12pt"/>
    </style:style>
    <style:style style:parent-style-name="912" style:list-style-name="WWNum6" style:family="paragraph" style:name="P136">
      <style:paragraph-properties fo:line-height="115%" fo:margin-right="0cm" fo:margin-top="0pt" fo:margin-bottom="0pt" fo:border="none"/>
      <style:text-properties/>
    </style:style>
    <style:style style:family="text" style:name="T768">
      <style:text-properties fo:color="#1f1f1f" fo:font-family="Arial" style:font-family-asian="Arial" style:font-family-complex="Arial" fo:font-size="12pt"/>
    </style:style>
    <style:style style:parent-style-name="912" style:list-style-name="WWNum6" style:family="paragraph" style:name="P137">
      <style:paragraph-properties fo:line-height="115%" fo:margin-right="0cm" fo:margin-top="0pt" fo:margin-bottom="0pt" fo:border="none"/>
      <style:text-properties/>
    </style:style>
    <style:style style:family="text" style:name="T769">
      <style:text-properties fo:color="#1f1f1f" fo:font-family="Arial" style:font-family-asian="Arial" style:font-family-complex="Arial" fo:font-size="12pt"/>
    </style:style>
    <style:style style:family="paragraph" style:name="P138">
      <style:paragraph-properties/>
      <style:text-properties/>
    </style:style>
    <style:style style:parent-style-name="851" style:family="paragraph" style:name="P13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70">
      <style:text-properties fo:color="#1f1f1f" fo:font-family="Arial" style:font-family-asian="Arial" style:font-family-complex="Arial" fo:font-size="14pt" fo:font-weight="bold"/>
    </style:style>
    <style:style style:family="paragraph" style:name="P140">
      <style:paragraph-properties fo:line-height="115%" fo:margin-left="0cm" fo:margin-right="0cm" fo:text-indent="0cm" fo:margin-top="0pt" fo:margin-bottom="0pt" fo:border="none"/>
      <style:text-properties/>
    </style:style>
    <style:style style:family="text" style:name="T771">
      <style:text-properties fo:color="#1f1f1f" fo:font-family="Arial" style:font-family-asian="Arial" style:font-family-complex="Arial" fo:font-size="12pt"/>
    </style:style>
    <style:style style:parent-style-name="852" style:family="paragraph" style:name="P14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72">
      <style:text-properties fo:color="#1f1f1f" fo:font-family="Arial" style:font-family-asian="Arial" style:font-family-complex="Arial" fo:font-size="12pt" fo:font-weight="bold"/>
    </style:style>
    <style:style style:family="paragraph" style:name="P142">
      <style:paragraph-properties fo:line-height="115%" fo:margin-left="0cm" fo:margin-right="0cm" fo:text-indent="0cm" fo:margin-top="0pt" fo:margin-bottom="0pt" fo:border="none"/>
      <style:text-properties/>
    </style:style>
    <style:style style:family="text" style:name="T773">
      <style:text-properties fo:color="#1f1f1f" fo:font-family="Arial" style:font-family-asian="Arial" style:font-family-complex="Arial" fo:font-size="12pt"/>
    </style:style>
    <style:style style:family="text" style:name="T774">
      <style:text-properties fo:color="#1f1f1f" fo:font-family="Arial" style:font-family-asian="Arial" style:font-family-complex="Arial" fo:font-size="12pt"/>
    </style:style>
    <style:style style:parent-style-name="852" style:family="paragraph" style:name="P14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75">
      <style:text-properties fo:color="#1f1f1f" fo:font-family="Arial" style:font-family-asian="Arial" style:font-family-complex="Arial" fo:font-size="12pt" fo:font-weight="bold"/>
    </style:style>
    <style:style style:family="paragraph" style:name="P144">
      <style:paragraph-properties fo:line-height="115%" fo:margin-left="0cm" fo:margin-right="0cm" fo:text-indent="0cm" fo:margin-top="0pt" fo:margin-bottom="0pt" fo:border="none"/>
      <style:text-properties/>
    </style:style>
    <style:style style:family="text" style:name="T776">
      <style:text-properties fo:color="#1f1f1f" fo:font-family="Arial" style:font-family-asian="Arial" style:font-family-complex="Arial" fo:font-size="12pt"/>
    </style:style>
    <style:style style:family="text" style:name="T777">
      <style:text-properties fo:color="#1f1f1f" fo:font-family="Arial" style:font-family-asian="Arial" style:font-family-complex="Arial" fo:font-size="12pt"/>
    </style:style>
    <style:style style:parent-style-name="852" style:family="paragraph" style:name="P14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78">
      <style:text-properties fo:color="#1f1f1f" fo:font-family="Arial" style:font-family-asian="Arial" style:font-family-complex="Arial" fo:font-size="12pt" fo:font-weight="bold"/>
    </style:style>
    <style:style style:family="paragraph" style:name="P146">
      <style:paragraph-properties fo:line-height="115%" fo:margin-left="0cm" fo:margin-right="0cm" fo:text-indent="0cm" fo:margin-top="0pt" fo:margin-bottom="0pt" fo:border="none"/>
      <style:text-properties/>
    </style:style>
    <style:style style:family="text" style:name="T779">
      <style:text-properties fo:color="#1f1f1f" fo:font-family="Arial" style:font-family-asian="Arial" style:font-family-complex="Arial" fo:font-size="12pt"/>
    </style:style>
    <style:style style:family="text" style:name="T780">
      <style:text-properties fo:color="#1f1f1f" fo:font-family="Arial" style:font-family-asian="Arial" style:font-family-complex="Arial" fo:font-size="12pt"/>
    </style:style>
    <style:style style:parent-style-name="852" style:family="paragraph" style:name="P14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1">
      <style:text-properties fo:color="#1f1f1f" fo:font-family="Arial" style:font-family-asian="Arial" style:font-family-complex="Arial" fo:font-size="12pt" fo:font-weight="bold"/>
    </style:style>
    <style:style style:family="paragraph" style:name="P148">
      <style:paragraph-properties fo:line-height="115%" fo:margin-left="0cm" fo:margin-right="0cm" fo:text-indent="0cm" fo:margin-top="0pt" fo:margin-bottom="0pt" fo:border="none"/>
      <style:text-properties/>
    </style:style>
    <style:style style:family="text" style:name="T782">
      <style:text-properties fo:color="#1f1f1f" fo:font-family="Arial" style:font-family-asian="Arial" style:font-family-complex="Arial" fo:font-size="12pt"/>
    </style:style>
    <style:style style:family="text" style:name="T783">
      <style:text-properties fo:color="#1f1f1f" fo:font-family="Arial" style:font-family-asian="Arial" style:font-family-complex="Arial" fo:font-size="12pt"/>
    </style:style>
    <style:style style:parent-style-name="851" style:family="paragraph" style:name="P14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84">
      <style:text-properties fo:color="#1f1f1f" fo:font-family="Arial" style:font-family-asian="Arial" style:font-family-complex="Arial" fo:font-size="14pt" fo:font-weight="bold"/>
    </style:style>
    <style:style style:parent-style-name="912" style:list-style-name="WWNum7" style:family="paragraph" style:name="P150">
      <style:paragraph-properties fo:line-height="115%" fo:margin-right="0cm" fo:margin-top="0pt" fo:margin-bottom="0pt" fo:border="none"/>
      <style:text-properties/>
    </style:style>
    <style:style style:family="text" style:name="T785">
      <style:text-properties fo:color="#1f1f1f" fo:font-family="Arial" style:font-family-asian="Arial" style:font-family-complex="Arial" fo:font-size="12pt"/>
    </style:style>
    <style:style style:parent-style-name="912" style:list-style-name="WWNum7" style:family="paragraph" style:name="P151">
      <style:paragraph-properties fo:line-height="115%" fo:margin-right="0cm" fo:margin-top="0pt" fo:margin-bottom="0pt" fo:border="none"/>
      <style:text-properties/>
    </style:style>
    <style:style style:family="text" style:name="T786">
      <style:text-properties fo:color="#1f1f1f" fo:font-family="Arial" style:font-family-asian="Arial" style:font-family-complex="Arial" fo:font-size="12pt"/>
    </style:style>
    <style:style style:parent-style-name="912" style:list-style-name="WWNum7" style:family="paragraph" style:name="P152">
      <style:paragraph-properties fo:line-height="115%" fo:margin-right="0cm" fo:margin-top="0pt" fo:margin-bottom="0pt" fo:border="none"/>
      <style:text-properties/>
    </style:style>
    <style:style style:family="text" style:name="T787">
      <style:text-properties fo:color="#1f1f1f" fo:font-family="Arial" style:font-family-asian="Arial" style:font-family-complex="Arial" fo:font-size="12pt"/>
    </style:style>
    <style:style style:parent-style-name="912" style:list-style-name="WWNum7" style:family="paragraph" style:name="P153">
      <style:paragraph-properties fo:line-height="115%" fo:margin-right="0cm" fo:margin-top="0pt" fo:margin-bottom="0pt" fo:border="none"/>
      <style:text-properties/>
    </style:style>
    <style:style style:family="text" style:name="T788">
      <style:text-properties fo:color="#1f1f1f" fo:font-family="Arial" style:font-family-asian="Arial" style:font-family-complex="Arial" fo:font-size="12pt"/>
    </style:style>
    <style:style style:family="paragraph" style:name="P154">
      <style:paragraph-properties/>
      <style:text-properties/>
    </style:style>
    <style:style style:family="paragraph" style:name="P155">
      <style:paragraph-properties fo:line-height="115%" fo:margin-left="0cm" fo:margin-right="0cm" fo:text-indent="0cm" fo:margin-top="0pt" fo:margin-bottom="0pt" fo:break-before="page" fo:border="none"/>
      <style:text-properties/>
    </style:style>
    <style:style style:family="text" style:name="T789">
      <style:text-properties fo:color="#1f1f1f" fo:font-family="Arial" style:font-family-asian="Arial" style:font-family-complex="Arial" fo:font-size="12pt"/>
    </style:style>
    <style:style style:parent-style-name="851" style:family="paragraph" style:name="P15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90">
      <style:text-properties fo:color="#1f1f1f" fo:font-family="Arial" style:font-family-asian="Arial" style:font-family-complex="Arial" fo:font-size="14pt" fo:font-weight="bold"/>
    </style:style>
    <style:style style:family="paragraph" style:name="P157">
      <style:paragraph-properties fo:line-height="115%" fo:margin-left="0cm" fo:margin-right="0cm" fo:text-indent="0cm" fo:margin-top="0pt" fo:margin-bottom="0pt" fo:border="none"/>
      <style:text-properties/>
    </style:style>
    <style:style style:family="text" style:name="T791">
      <style:text-properties fo:color="#1f1f1f" fo:font-family="Arial" style:font-family-asian="Arial" style:font-family-complex="Arial" fo:font-size="12pt"/>
    </style:style>
    <style:style style:parent-style-name="852" style:family="paragraph" style:name="P15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2">
      <style:text-properties fo:color="#1f1f1f" fo:font-family="Arial" style:font-family-asian="Arial" style:font-family-complex="Arial" fo:font-size="12pt" fo:font-weight="bold"/>
    </style:style>
    <style:style style:family="paragraph" style:name="P159">
      <style:paragraph-properties fo:line-height="115%" fo:margin-left="0cm" fo:margin-right="0cm" fo:text-indent="0cm" fo:margin-top="0pt" fo:margin-bottom="0pt" fo:border="none"/>
      <style:text-properties/>
    </style:style>
    <style:style style:family="text" style:name="T793">
      <style:text-properties fo:color="#1f1f1f" fo:font-family="Arial" style:font-family-asian="Arial" style:font-family-complex="Arial" fo:font-size="12pt"/>
    </style:style>
    <style:style style:parent-style-name="852" style:family="paragraph" style:name="P16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4">
      <style:text-properties fo:color="#1f1f1f" fo:font-family="Arial" style:font-family-asian="Arial" style:font-family-complex="Arial" fo:font-size="12pt" fo:font-weight="bold"/>
    </style:style>
    <style:style style:family="paragraph" style:name="P161">
      <style:paragraph-properties fo:line-height="115%" fo:margin-left="0cm" fo:margin-right="0cm" fo:text-indent="0cm" fo:margin-top="0pt" fo:margin-bottom="0pt" fo:border="none"/>
      <style:text-properties/>
    </style:style>
    <style:style style:family="text" style:name="T795">
      <style:text-properties fo:color="#1f1f1f" fo:font-family="Arial" style:font-family-asian="Arial" style:font-family-complex="Arial" fo:font-size="12pt"/>
    </style:style>
    <style:style style:parent-style-name="852" style:family="paragraph" style:name="P16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6">
      <style:text-properties fo:color="#1f1f1f" fo:font-family="Arial" style:font-family-asian="Arial" style:font-family-complex="Arial" fo:font-size="12pt" fo:font-weight="bold"/>
    </style:style>
    <style:style style:family="paragraph" style:name="P163">
      <style:paragraph-properties fo:line-height="115%" fo:margin-left="0cm" fo:margin-right="0cm" fo:text-indent="0cm" fo:margin-top="0pt" fo:margin-bottom="0pt" fo:border="none"/>
      <style:text-properties/>
    </style:style>
    <style:style style:family="text" style:name="T797">
      <style:text-properties fo:color="#1f1f1f" fo:font-family="Arial" style:font-family-asian="Arial" style:font-family-complex="Arial" fo:font-size="12pt"/>
    </style:style>
    <style:style style:parent-style-name="852" style:family="paragraph" style:name="P16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8">
      <style:text-properties fo:color="#1f1f1f" fo:font-family="Arial" style:font-family-asian="Arial" style:font-family-complex="Arial" fo:font-size="12pt" fo:font-weight="bold"/>
    </style:style>
    <style:style style:family="paragraph" style:name="P165">
      <style:paragraph-properties fo:line-height="115%" fo:margin-left="0cm" fo:margin-right="0cm" fo:text-indent="0cm" fo:margin-top="0pt" fo:margin-bottom="0pt" fo:border="none"/>
      <style:text-properties/>
    </style:style>
    <style:style style:family="text" style:name="T799">
      <style:text-properties fo:color="#1f1f1f" fo:font-family="Arial" style:font-family-asian="Arial" style:font-family-complex="Arial" fo:font-size="12pt"/>
    </style:style>
    <style:style style:parent-style-name="851" style:family="paragraph" style:name="P16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00">
      <style:text-properties fo:color="#1f1f1f" fo:font-family="Arial" style:font-family-asian="Arial" style:font-family-complex="Arial" fo:font-size="14pt" fo:font-weight="bold"/>
    </style:style>
    <style:style style:parent-style-name="912" style:list-style-name="WWNum8" style:family="paragraph" style:name="P167">
      <style:paragraph-properties fo:line-height="115%" fo:margin-right="0cm" fo:margin-top="0pt" fo:margin-bottom="0pt" fo:border="none"/>
      <style:text-properties/>
    </style:style>
    <style:style style:family="text" style:name="T801">
      <style:text-properties fo:color="#1f1f1f" fo:font-family="Arial" style:font-family-asian="Arial" style:font-family-complex="Arial" fo:font-size="12pt"/>
    </style:style>
    <style:style style:parent-style-name="912" style:list-style-name="WWNum8" style:family="paragraph" style:name="P168">
      <style:paragraph-properties fo:line-height="115%" fo:margin-right="0cm" fo:margin-top="0pt" fo:margin-bottom="0pt" fo:border="none"/>
      <style:text-properties/>
    </style:style>
    <style:style style:family="text" style:name="T802">
      <style:text-properties fo:color="#1f1f1f" fo:font-family="Arial" style:font-family-asian="Arial" style:font-family-complex="Arial" fo:font-size="12pt"/>
    </style:style>
    <style:style style:parent-style-name="912" style:list-style-name="WWNum8" style:family="paragraph" style:name="P169">
      <style:paragraph-properties fo:line-height="115%" fo:margin-right="0cm" fo:margin-top="0pt" fo:margin-bottom="0pt" fo:border="none"/>
      <style:text-properties/>
    </style:style>
    <style:style style:family="text" style:name="T803">
      <style:text-properties fo:color="#1f1f1f" fo:font-family="Arial" style:font-family-asian="Arial" style:font-family-complex="Arial" fo:font-size="12pt"/>
    </style:style>
    <style:style style:parent-style-name="912" style:list-style-name="WWNum8" style:family="paragraph" style:name="P170">
      <style:paragraph-properties fo:line-height="115%" fo:margin-right="0cm" fo:margin-top="0pt" fo:margin-bottom="0pt" fo:border="none"/>
      <style:text-properties/>
    </style:style>
    <style:style style:family="text" style:name="T804">
      <style:text-properties fo:color="#1f1f1f" fo:font-family="Arial" style:font-family-asian="Arial" style:font-family-complex="Arial" fo:font-size="12pt"/>
    </style:style>
    <style:style style:family="paragraph" style:name="P171">
      <style:paragraph-properties/>
      <style:text-properties/>
    </style:style>
    <style:style style:parent-style-name="851" style:family="paragraph" style:name="P17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05">
      <style:text-properties fo:color="#1f1f1f" fo:font-family="Arial" style:font-family-asian="Arial" style:font-family-complex="Arial" fo:font-size="14pt" fo:font-weight="bold"/>
    </style:style>
    <style:style style:family="paragraph" style:name="P173">
      <style:paragraph-properties fo:line-height="115%" fo:margin-left="0cm" fo:margin-right="0cm" fo:text-indent="0cm" fo:margin-top="0pt" fo:margin-bottom="0pt" fo:border="none"/>
      <style:text-properties/>
    </style:style>
    <style:style style:family="text" style:name="T806">
      <style:text-properties fo:color="#1f1f1f" fo:font-family="Arial" style:font-family-asian="Arial" style:font-family-complex="Arial" fo:font-size="12pt"/>
    </style:style>
    <style:style style:parent-style-name="852" style:family="paragraph" style:name="P1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7">
      <style:text-properties fo:color="#1f1f1f" fo:font-family="Arial" style:font-family-asian="Arial" style:font-family-complex="Arial" fo:font-size="12pt" fo:font-weight="bold"/>
    </style:style>
    <style:style style:family="paragraph" style:name="P175">
      <style:paragraph-properties fo:line-height="115%" fo:margin-left="0cm" fo:margin-right="0cm" fo:text-indent="0cm" fo:margin-top="0pt" fo:margin-bottom="0pt" fo:border="none"/>
      <style:text-properties/>
    </style:style>
    <style:style style:family="text" style:name="T808">
      <style:text-properties fo:color="#1f1f1f" fo:font-family="Arial" style:font-family-asian="Arial" style:font-family-complex="Arial" fo:font-size="12pt"/>
    </style:style>
    <style:style style:parent-style-name="852" style:family="paragraph" style:name="P1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9">
      <style:text-properties fo:color="#1f1f1f" fo:font-family="Arial" style:font-family-asian="Arial" style:font-family-complex="Arial" fo:font-size="12pt" fo:font-weight="bold"/>
    </style:style>
    <style:style style:family="paragraph" style:name="P177">
      <style:paragraph-properties fo:line-height="115%" fo:margin-left="0cm" fo:margin-right="0cm" fo:text-indent="0cm" fo:margin-top="0pt" fo:margin-bottom="0pt" fo:border="none"/>
      <style:text-properties/>
    </style:style>
    <style:style style:family="text" style:name="T810">
      <style:text-properties fo:color="#1f1f1f" fo:font-family="Arial" style:font-family-asian="Arial" style:font-family-complex="Arial" fo:font-size="12pt"/>
    </style:style>
    <style:style style:parent-style-name="852" style:family="paragraph" style:name="P17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11">
      <style:text-properties fo:color="#1f1f1f" fo:font-family="Arial" style:font-family-asian="Arial" style:font-family-complex="Arial" fo:font-size="12pt" fo:font-weight="bold"/>
    </style:style>
    <style:style style:family="paragraph" style:name="P179">
      <style:paragraph-properties fo:line-height="115%" fo:margin-left="0cm" fo:margin-right="0cm" fo:text-indent="0cm" fo:margin-top="0pt" fo:margin-bottom="0pt" fo:border="none"/>
      <style:text-properties/>
    </style:style>
    <style:style style:family="text" style:name="T812">
      <style:text-properties fo:color="#1f1f1f" fo:font-family="Arial" style:font-family-asian="Arial" style:font-family-complex="Arial" fo:font-size="12pt"/>
    </style:style>
    <style:style style:parent-style-name="852" style:family="paragraph" style:name="P18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13">
      <style:text-properties fo:color="#1f1f1f" fo:font-family="Arial" style:font-family-asian="Arial" style:font-family-complex="Arial" fo:font-size="12pt" fo:font-weight="bold"/>
    </style:style>
    <style:style style:family="paragraph" style:name="P181">
      <style:paragraph-properties fo:line-height="115%" fo:margin-left="0cm" fo:margin-right="0cm" fo:text-indent="0cm" fo:margin-top="0pt" fo:margin-bottom="0pt" fo:border="none"/>
      <style:text-properties/>
    </style:style>
    <style:style style:family="text" style:name="T814">
      <style:text-properties fo:color="#1f1f1f" fo:font-family="Arial" style:font-family-asian="Arial" style:font-family-complex="Arial" fo:font-size="12pt"/>
    </style:style>
    <style:style style:parent-style-name="851" style:family="paragraph" style:name="P18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15">
      <style:text-properties fo:color="#1f1f1f" fo:font-family="Arial" style:font-family-asian="Arial" style:font-family-complex="Arial" fo:font-size="14pt" fo:font-weight="bold"/>
    </style:style>
    <style:style style:parent-style-name="912" style:list-style-name="WWNum9" style:family="paragraph" style:name="P183">
      <style:paragraph-properties fo:line-height="115%" fo:margin-right="0cm" fo:margin-top="0pt" fo:margin-bottom="0pt" fo:border="none"/>
      <style:text-properties/>
    </style:style>
    <style:style style:family="text" style:name="T816">
      <style:text-properties fo:color="#1f1f1f" fo:font-family="Arial" style:font-family-asian="Arial" style:font-family-complex="Arial" fo:font-size="12pt"/>
    </style:style>
    <style:style style:parent-style-name="912" style:list-style-name="WWNum9" style:family="paragraph" style:name="P184">
      <style:paragraph-properties fo:line-height="115%" fo:margin-right="0cm" fo:margin-top="0pt" fo:margin-bottom="0pt" fo:border="none"/>
      <style:text-properties/>
    </style:style>
    <style:style style:family="text" style:name="T817">
      <style:text-properties fo:color="#1f1f1f" fo:font-family="Arial" style:font-family-asian="Arial" style:font-family-complex="Arial" fo:font-size="12pt"/>
    </style:style>
    <style:style style:parent-style-name="912" style:list-style-name="WWNum9" style:family="paragraph" style:name="P185">
      <style:paragraph-properties fo:line-height="115%" fo:margin-right="0cm" fo:margin-top="0pt" fo:margin-bottom="0pt" fo:border="none"/>
      <style:text-properties/>
    </style:style>
    <style:style style:family="text" style:name="T818">
      <style:text-properties fo:color="#1f1f1f" fo:font-family="Arial" style:font-family-asian="Arial" style:font-family-complex="Arial" fo:font-size="12pt"/>
    </style:style>
    <style:style style:parent-style-name="912" style:list-style-name="WWNum9" style:family="paragraph" style:name="P186">
      <style:paragraph-properties fo:line-height="115%" fo:margin-right="0cm" fo:margin-top="0pt" fo:margin-bottom="0pt" fo:border="none"/>
      <style:text-properties/>
    </style:style>
    <style:style style:family="text" style:name="T819">
      <style:text-properties fo:color="#1f1f1f" fo:font-family="Arial" style:font-family-asian="Arial" style:font-family-complex="Arial" fo:font-size="12pt"/>
    </style:style>
    <style:style style:family="paragraph" style:name="P187">
      <style:paragraph-properties/>
      <style:text-properties/>
    </style:style>
    <style:style style:family="paragraph" style:name="P188">
      <style:paragraph-properties fo:line-height="115%" fo:margin-left="0cm" fo:margin-right="0cm" fo:text-indent="0cm" fo:margin-top="0pt" fo:margin-bottom="0pt" fo:break-before="page" fo:border="none"/>
      <style:text-properties/>
    </style:style>
    <style:style style:family="text" style:name="T820">
      <style:text-properties fo:color="#1f1f1f" fo:font-family="Arial" style:font-family-asian="Arial" style:font-family-complex="Arial" fo:font-size="12pt"/>
    </style:style>
    <style:style style:parent-style-name="851" style:family="paragraph" style:name="P18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21">
      <style:text-properties fo:color="#1f1f1f" fo:font-family="Arial" style:font-family-asian="Arial" style:font-family-complex="Arial" fo:font-size="14pt" fo:font-weight="bold"/>
    </style:style>
    <style:style style:family="paragraph" style:name="P190">
      <style:paragraph-properties fo:line-height="115%" fo:margin-left="0cm" fo:margin-right="0cm" fo:text-indent="0cm" fo:margin-top="0pt" fo:margin-bottom="0pt" fo:border="none"/>
      <style:text-properties/>
    </style:style>
    <style:style style:family="text" style:name="T822">
      <style:text-properties fo:color="#1f1f1f" fo:font-family="Arial" style:font-family-asian="Arial" style:font-family-complex="Arial" fo:font-size="12pt"/>
    </style:style>
    <style:style style:parent-style-name="852" style:family="paragraph" style:name="P19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3">
      <style:text-properties fo:color="#1f1f1f" fo:font-family="Arial" style:font-family-asian="Arial" style:font-family-complex="Arial" fo:font-size="12pt" fo:font-weight="bold"/>
    </style:style>
    <style:style style:family="paragraph" style:name="P192">
      <style:paragraph-properties fo:line-height="115%" fo:margin-left="0cm" fo:margin-right="0cm" fo:text-indent="0cm" fo:margin-top="0pt" fo:margin-bottom="0pt" fo:border="none"/>
      <style:text-properties/>
    </style:style>
    <style:style style:family="text" style:name="T824">
      <style:text-properties fo:color="#1f1f1f" fo:font-family="Arial" style:font-family-asian="Arial" style:font-family-complex="Arial" fo:font-size="12pt"/>
    </style:style>
    <style:style style:parent-style-name="852" style:family="paragraph" style:name="P1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5">
      <style:text-properties fo:color="#1f1f1f" fo:font-family="Arial" style:font-family-asian="Arial" style:font-family-complex="Arial" fo:font-size="12pt" fo:font-weight="bold"/>
    </style:style>
    <style:style style:family="paragraph" style:name="P194">
      <style:paragraph-properties fo:line-height="115%" fo:margin-left="0cm" fo:margin-right="0cm" fo:text-indent="0cm" fo:margin-top="0pt" fo:margin-bottom="0pt" fo:border="none"/>
      <style:text-properties/>
    </style:style>
    <style:style style:family="text" style:name="T826">
      <style:text-properties fo:color="#1f1f1f" fo:font-family="Arial" style:font-family-asian="Arial" style:font-family-complex="Arial" fo:font-size="12pt"/>
    </style:style>
    <style:style style:parent-style-name="852" style:family="paragraph" style:name="P1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7">
      <style:text-properties fo:color="#1f1f1f" fo:font-family="Arial" style:font-family-asian="Arial" style:font-family-complex="Arial" fo:font-size="12pt" fo:font-weight="bold"/>
    </style:style>
    <style:style style:family="paragraph" style:name="P196">
      <style:paragraph-properties fo:line-height="115%" fo:margin-left="0cm" fo:margin-right="0cm" fo:text-indent="0cm" fo:margin-top="0pt" fo:margin-bottom="0pt" fo:border="none"/>
      <style:text-properties/>
    </style:style>
    <style:style style:family="text" style:name="T828">
      <style:text-properties fo:color="#1f1f1f" fo:font-family="Arial" style:font-family-asian="Arial" style:font-family-complex="Arial" fo:font-size="12pt"/>
    </style:style>
    <style:style style:parent-style-name="852" style:family="paragraph" style:name="P1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9">
      <style:text-properties fo:color="#1f1f1f" fo:font-family="Arial" style:font-family-asian="Arial" style:font-family-complex="Arial" fo:font-size="12pt" fo:font-weight="bold"/>
    </style:style>
    <style:style style:family="paragraph" style:name="P198">
      <style:paragraph-properties fo:line-height="115%" fo:margin-left="0cm" fo:margin-right="0cm" fo:text-indent="0cm" fo:margin-top="0pt" fo:margin-bottom="0pt" fo:border="none"/>
      <style:text-properties/>
    </style:style>
    <style:style style:family="text" style:name="T830">
      <style:text-properties fo:color="#1f1f1f" fo:font-family="Arial" style:font-family-asian="Arial" style:font-family-complex="Arial" fo:font-size="12pt"/>
    </style:style>
    <style:style style:parent-style-name="851" style:family="paragraph" style:name="P19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31">
      <style:text-properties fo:color="#1f1f1f" fo:font-family="Arial" style:font-family-asian="Arial" style:font-family-complex="Arial" fo:font-size="14pt" fo:font-weight="bold"/>
    </style:style>
    <style:style style:parent-style-name="912" style:list-style-name="WWNum10" style:family="paragraph" style:name="P200">
      <style:paragraph-properties fo:line-height="115%" fo:margin-right="0cm" fo:margin-top="0pt" fo:margin-bottom="0pt" fo:border="none"/>
      <style:text-properties/>
    </style:style>
    <style:style style:family="text" style:name="T832">
      <style:text-properties fo:color="#1f1f1f" fo:font-family="Arial" style:font-family-asian="Arial" style:font-family-complex="Arial" fo:font-size="12pt"/>
    </style:style>
    <style:style style:parent-style-name="912" style:list-style-name="WWNum10" style:family="paragraph" style:name="P201">
      <style:paragraph-properties fo:line-height="115%" fo:margin-right="0cm" fo:margin-top="0pt" fo:margin-bottom="0pt" fo:border="none"/>
      <style:text-properties/>
    </style:style>
    <style:style style:family="text" style:name="T833">
      <style:text-properties fo:color="#1f1f1f" fo:font-family="Arial" style:font-family-asian="Arial" style:font-family-complex="Arial" fo:font-size="12pt"/>
    </style:style>
    <style:style style:parent-style-name="912" style:list-style-name="WWNum10" style:family="paragraph" style:name="P202">
      <style:paragraph-properties fo:line-height="115%" fo:margin-right="0cm" fo:margin-top="0pt" fo:margin-bottom="0pt" fo:border="none"/>
      <style:text-properties/>
    </style:style>
    <style:style style:family="text" style:name="T834">
      <style:text-properties fo:color="#1f1f1f" fo:font-family="Arial" style:font-family-asian="Arial" style:font-family-complex="Arial" fo:font-size="12pt"/>
    </style:style>
    <style:style style:parent-style-name="912" style:list-style-name="WWNum10" style:family="paragraph" style:name="P203">
      <style:paragraph-properties fo:line-height="115%" fo:margin-right="0cm" fo:margin-top="0pt" fo:margin-bottom="0pt" fo:border="none"/>
      <style:text-properties/>
    </style:style>
    <style:style style:family="text" style:name="T835">
      <style:text-properties fo:color="#1f1f1f" fo:font-family="Arial" style:font-family-asian="Arial" style:font-family-complex="Arial" fo:font-size="12pt"/>
    </style:style>
    <style:style style:family="paragraph" style:name="P204">
      <style:paragraph-properties/>
      <style:text-properties/>
    </style:style>
    <style:style style:family="paragraph" style:name="P205">
      <style:paragraph-properties fo:line-height="115%" fo:margin-left="0cm" fo:margin-right="0cm" fo:text-indent="0cm" fo:margin-top="0pt" fo:margin-bottom="0pt" fo:break-before="page" fo:border="none"/>
      <style:text-properties/>
    </style:style>
    <style:style style:family="text" style:name="T836">
      <style:text-properties fo:color="#1f1f1f" fo:font-family="Arial" style:font-family-asian="Arial" style:font-family-complex="Arial" fo:font-size="12pt"/>
    </style:style>
    <style:style style:parent-style-name="851" style:family="paragraph" style:name="P20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37">
      <style:text-properties fo:color="#1f1f1f" fo:font-family="Arial" style:font-family-asian="Arial" style:font-family-complex="Arial" fo:font-size="14pt" fo:font-weight="bold"/>
    </style:style>
    <style:style style:family="paragraph" style:name="P207">
      <style:paragraph-properties fo:line-height="115%" fo:margin-left="0cm" fo:margin-right="0cm" fo:text-indent="0cm" fo:margin-top="0pt" fo:margin-bottom="0pt" fo:border="none"/>
      <style:text-properties/>
    </style:style>
    <style:style style:family="text" style:name="T838">
      <style:text-properties fo:color="#1f1f1f" fo:font-family="Arial" style:font-family-asian="Arial" style:font-family-complex="Arial" fo:font-size="12pt"/>
    </style:style>
    <style:style style:parent-style-name="852" style:family="paragraph" style:name="P20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39">
      <style:text-properties fo:color="#1f1f1f" fo:font-family="Arial" style:font-family-asian="Arial" style:font-family-complex="Arial" fo:font-size="12pt" fo:font-weight="bold"/>
    </style:style>
    <style:style style:family="paragraph" style:name="P209">
      <style:paragraph-properties fo:line-height="115%" fo:margin-left="0cm" fo:margin-right="0cm" fo:text-indent="0cm" fo:margin-top="0pt" fo:margin-bottom="0pt" fo:border="none"/>
      <style:text-properties/>
    </style:style>
    <style:style style:family="text" style:name="T840">
      <style:text-properties fo:color="#1f1f1f" fo:font-family="Arial" style:font-family-asian="Arial" style:font-family-complex="Arial" fo:font-size="12pt"/>
    </style:style>
    <style:style style:parent-style-name="852" style:family="paragraph" style:name="P21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1">
      <style:text-properties fo:color="#1f1f1f" fo:font-family="Arial" style:font-family-asian="Arial" style:font-family-complex="Arial" fo:font-size="12pt" fo:font-weight="bold"/>
    </style:style>
    <style:style style:family="paragraph" style:name="P211">
      <style:paragraph-properties fo:line-height="115%" fo:margin-left="0cm" fo:margin-right="0cm" fo:text-indent="0cm" fo:margin-top="0pt" fo:margin-bottom="0pt" fo:border="none"/>
      <style:text-properties/>
    </style:style>
    <style:style style:family="text" style:name="T842">
      <style:text-properties fo:color="#1f1f1f" fo:font-family="Arial" style:font-family-asian="Arial" style:font-family-complex="Arial" fo:font-size="12pt"/>
    </style:style>
    <style:style style:parent-style-name="852" style:family="paragraph" style:name="P21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3">
      <style:text-properties fo:color="#1f1f1f" fo:font-family="Arial" style:font-family-asian="Arial" style:font-family-complex="Arial" fo:font-size="12pt" fo:font-weight="bold"/>
    </style:style>
    <style:style style:family="paragraph" style:name="P213">
      <style:paragraph-properties fo:line-height="115%" fo:margin-left="0cm" fo:margin-right="0cm" fo:text-indent="0cm" fo:margin-top="0pt" fo:margin-bottom="0pt" fo:border="none"/>
      <style:text-properties/>
    </style:style>
    <style:style style:family="text" style:name="T844">
      <style:text-properties fo:color="#1f1f1f" fo:font-family="Arial" style:font-family-asian="Arial" style:font-family-complex="Arial" fo:font-size="12pt"/>
    </style:style>
    <style:style style:parent-style-name="852" style:family="paragraph" style:name="P21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5">
      <style:text-properties fo:color="#1f1f1f" fo:font-family="Arial" style:font-family-asian="Arial" style:font-family-complex="Arial" fo:font-size="12pt" fo:font-weight="bold"/>
    </style:style>
    <style:style style:family="paragraph" style:name="P215">
      <style:paragraph-properties fo:line-height="115%" fo:margin-left="0cm" fo:margin-right="0cm" fo:text-indent="0cm" fo:margin-top="0pt" fo:margin-bottom="0pt" fo:border="none"/>
      <style:text-properties/>
    </style:style>
    <style:style style:family="text" style:name="T846">
      <style:text-properties fo:color="#1f1f1f" fo:font-family="Arial" style:font-family-asian="Arial" style:font-family-complex="Arial" fo:font-size="12pt"/>
    </style:style>
    <style:style style:parent-style-name="851" style:family="paragraph" style:name="P21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47">
      <style:text-properties fo:color="#1f1f1f" fo:font-family="Arial" style:font-family-asian="Arial" style:font-family-complex="Arial" fo:font-size="14pt" fo:font-weight="bold"/>
    </style:style>
    <style:style style:parent-style-name="912" style:list-style-name="WWNum11" style:family="paragraph" style:name="P217">
      <style:paragraph-properties fo:line-height="115%" fo:margin-right="0cm" fo:margin-top="0pt" fo:margin-bottom="0pt" fo:border="none"/>
      <style:text-properties/>
    </style:style>
    <style:style style:family="text" style:name="T848">
      <style:text-properties fo:color="#1f1f1f" fo:font-family="Arial" style:font-family-asian="Arial" style:font-family-complex="Arial" fo:font-size="12pt"/>
    </style:style>
    <style:style style:parent-style-name="912" style:list-style-name="WWNum11" style:family="paragraph" style:name="P218">
      <style:paragraph-properties fo:line-height="115%" fo:margin-right="0cm" fo:margin-top="0pt" fo:margin-bottom="0pt" fo:border="none"/>
      <style:text-properties/>
    </style:style>
    <style:style style:family="text" style:name="T849">
      <style:text-properties fo:color="#1f1f1f" fo:font-family="Arial" style:font-family-asian="Arial" style:font-family-complex="Arial" fo:font-size="12pt"/>
    </style:style>
    <style:style style:parent-style-name="912" style:list-style-name="WWNum11" style:family="paragraph" style:name="P219">
      <style:paragraph-properties fo:line-height="115%" fo:margin-right="0cm" fo:margin-top="0pt" fo:margin-bottom="0pt" fo:border="none"/>
      <style:text-properties/>
    </style:style>
    <style:style style:family="text" style:name="T850">
      <style:text-properties fo:color="#1f1f1f" fo:font-family="Arial" style:font-family-asian="Arial" style:font-family-complex="Arial" fo:font-size="12pt"/>
    </style:style>
    <style:style style:parent-style-name="912" style:list-style-name="WWNum11" style:family="paragraph" style:name="P220">
      <style:paragraph-properties fo:line-height="115%" fo:margin-right="0cm" fo:margin-top="0pt" fo:margin-bottom="0pt" fo:border="none"/>
      <style:text-properties/>
    </style:style>
    <style:style style:family="text" style:name="T851">
      <style:text-properties fo:color="#1f1f1f" fo:font-family="Arial" style:font-family-asian="Arial" style:font-family-complex="Arial" fo:font-size="12pt"/>
    </style:style>
    <style:style style:family="paragraph" style:name="P221">
      <style:paragraph-properties/>
      <style:text-properties/>
    </style:style>
    <style:style style:family="paragraph" style:name="P222">
      <style:paragraph-properties fo:break-before="page"/>
      <style:text-properties/>
    </style:style>
    <style:style style:parent-style-name="851" style:family="paragraph" style:name="P22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52">
      <style:text-properties fo:color="#1f1f1f" fo:font-family="Arial" style:font-family-asian="Arial" style:font-family-complex="Arial" fo:font-size="14pt" fo:font-weight="bold"/>
    </style:style>
    <style:style style:family="paragraph" style:name="P22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53">
      <style:text-properties fo:color="#1f1f1f" fo:font-family="Arial" style:font-family-asian="Arial" style:font-family-complex="Arial" fo:font-size="12pt"/>
    </style:style>
    <style:style style:parent-style-name="852" style:family="paragraph" style:name="P22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54">
      <style:text-properties fo:color="#1f1f1f" fo:font-family="Arial" style:font-family-asian="Arial" style:font-family-complex="Arial" fo:font-size="12pt" fo:font-weight="bold"/>
    </style:style>
    <style:style style:family="paragraph" style:name="P22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55">
      <style:text-properties fo:color="#1f1f1f" fo:font-family="Arial" style:font-family-asian="Arial" style:font-family-complex="Arial" fo:font-size="12pt"/>
    </style:style>
    <style:style style:parent-style-name="852" style:family="paragraph" style:name="P22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56">
      <style:text-properties fo:color="#1f1f1f" fo:font-family="Arial" style:font-family-asian="Arial" style:font-family-complex="Arial" fo:font-size="12pt" fo:font-weight="bold"/>
    </style:style>
    <style:style style:family="paragraph" style:name="P22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57">
      <style:text-properties fo:color="#1f1f1f" fo:font-family="Arial" style:font-family-asian="Arial" style:font-family-complex="Arial" fo:font-size="12pt"/>
    </style:style>
    <style:style style:family="table" style:name="ta2">
      <style:paragraph-properties fo:line-height="100%" fo:margin-bottom="0pt"/>
      <style:table-properties style:width="11.95cm" fo:margin-left="0cm" table:align="left" style:use-optimal-column-width="true"/>
    </style:style>
    <style:style style:family="table-column" style:name="co3">
      <style:table-column-properties style:column-width="1.471cm" style:use-optimal-column-width="true"/>
    </style:style>
    <style:style style:family="table-column" style:name="co4">
      <style:table-column-properties style:column-width="4.636cm" style:use-optimal-column-width="true"/>
    </style:style>
    <style:style style:family="table-column" style:name="co5">
      <style:table-column-properties style:column-width="5.842cm" style:use-optimal-column-width="true"/>
    </style:style>
    <style:style style:family="table-row" style:name="ro5">
      <style:table-row-properties/>
    </style:style>
    <style:style style:family="table-cell" style:name="ce1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29">
      <style:paragraph-properties style:line-height-at-least="12pt" fo:margin-top="0pt" fo:margin-bottom="0pt"/>
      <style:text-properties/>
    </style:style>
    <style:style style:family="text" style:name="T858">
      <style:text-properties fo:color="#1f1f1f" fo:font-family="Arial" style:font-family-asian="Arial" style:font-family-complex="Arial" fo:font-size="12pt" fo:font-weight="bold"/>
    </style:style>
    <style:style style:family="table-cell" style:name="ce1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0">
      <style:paragraph-properties style:line-height-at-least="12pt" fo:margin-top="0pt" fo:margin-bottom="0pt"/>
      <style:text-properties/>
    </style:style>
    <style:style style:family="text" style:name="T859">
      <style:text-properties fo:color="#1f1f1f" fo:font-family="Arial" style:font-family-asian="Arial" style:font-family-complex="Arial" fo:font-size="12pt" fo:font-weight="bold"/>
    </style:style>
    <style:style style:family="table-cell" style:name="ce1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1">
      <style:paragraph-properties style:line-height-at-least="12pt" fo:margin-top="0pt" fo:margin-bottom="0pt"/>
      <style:text-properties/>
    </style:style>
    <style:style style:family="text" style:name="T860">
      <style:text-properties fo:color="#1f1f1f" fo:font-family="Arial" style:font-family-asian="Arial" style:font-family-complex="Arial" fo:font-size="12pt" fo:font-weight="bold"/>
    </style:style>
    <style:style style:family="table-row" style:name="ro6">
      <style:table-row-properties/>
    </style:style>
    <style:style style:family="table-cell" style:name="ce1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2">
      <style:paragraph-properties style:line-height-at-least="12pt" fo:margin-top="0pt" fo:margin-bottom="0pt"/>
      <style:text-properties/>
    </style:style>
    <style:style style:family="text" style:name="T861">
      <style:text-properties fo:color="#1f1f1f" fo:font-family="Arial" style:font-family-asian="Arial" style:font-family-complex="Arial" fo:font-size="12pt"/>
    </style:style>
    <style:style style:family="table-cell" style:name="ce1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3">
      <style:paragraph-properties style:line-height-at-least="12pt" fo:margin-top="0pt" fo:margin-bottom="0pt"/>
      <style:text-properties/>
    </style:style>
    <style:style style:family="text" style:name="T862">
      <style:text-properties fo:color="#1f1f1f" fo:font-family="Arial" style:font-family-asian="Arial" style:font-family-complex="Arial" fo:font-size="12pt"/>
    </style:style>
    <style:style style:family="table-cell" style:name="ce1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4">
      <style:paragraph-properties style:line-height-at-least="12pt" fo:margin-top="0pt" fo:margin-bottom="0pt"/>
      <style:text-properties/>
    </style:style>
    <style:style style:family="text" style:name="T863">
      <style:text-properties fo:color="#1f1f1f" fo:font-family="Arial" style:font-family-asian="Arial" style:font-family-complex="Arial" fo:font-size="12pt"/>
    </style:style>
    <style:style style:family="table-row" style:name="ro7">
      <style:table-row-properties/>
    </style:style>
    <style:style style:family="table-cell" style:name="ce1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5">
      <style:paragraph-properties style:line-height-at-least="12pt" fo:margin-top="0pt" fo:margin-bottom="0pt"/>
      <style:text-properties/>
    </style:style>
    <style:style style:family="text" style:name="T864">
      <style:text-properties fo:color="#1f1f1f" fo:font-family="Arial" style:font-family-asian="Arial" style:font-family-complex="Arial" fo:font-size="12pt"/>
    </style:style>
    <style:style style:family="table-cell" style:name="ce1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6">
      <style:paragraph-properties style:line-height-at-least="12pt" fo:margin-top="0pt" fo:margin-bottom="0pt"/>
      <style:text-properties/>
    </style:style>
    <style:style style:family="text" style:name="T865">
      <style:text-properties fo:color="#1f1f1f" fo:font-family="Arial" style:font-family-asian="Arial" style:font-family-complex="Arial" fo:font-size="12pt"/>
    </style:style>
    <style:style style:family="table-cell" style:name="ce1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7">
      <style:paragraph-properties style:line-height-at-least="12pt" fo:margin-top="0pt" fo:margin-bottom="0pt"/>
      <style:text-properties/>
    </style:style>
    <style:style style:family="text" style:name="T866">
      <style:text-properties fo:color="#1f1f1f" fo:font-family="Arial" style:font-family-asian="Arial" style:font-family-complex="Arial" fo:font-size="12pt"/>
    </style:style>
    <style:style style:family="table-row" style:name="ro8">
      <style:table-row-properties/>
    </style:style>
    <style:style style:family="table-cell" style:name="ce2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8">
      <style:paragraph-properties style:line-height-at-least="12pt" fo:margin-top="0pt" fo:margin-bottom="0pt"/>
      <style:text-properties/>
    </style:style>
    <style:style style:family="text" style:name="T867">
      <style:text-properties fo:color="#1f1f1f" fo:font-family="Arial" style:font-family-asian="Arial" style:font-family-complex="Arial" fo:font-size="12pt"/>
    </style:style>
    <style:style style:family="table-cell" style:name="ce2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39">
      <style:paragraph-properties style:line-height-at-least="12pt" fo:margin-top="0pt" fo:margin-bottom="0pt"/>
      <style:text-properties/>
    </style:style>
    <style:style style:family="text" style:name="T868">
      <style:text-properties fo:color="#1f1f1f" fo:font-family="Arial" style:font-family-asian="Arial" style:font-family-complex="Arial" fo:font-size="12pt"/>
    </style:style>
    <style:style style:family="table-cell" style:name="ce2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40">
      <style:paragraph-properties style:line-height-at-least="12pt" fo:margin-top="0pt" fo:margin-bottom="0pt"/>
      <style:text-properties/>
    </style:style>
    <style:style style:family="text" style:name="T869">
      <style:text-properties fo:color="#1f1f1f" fo:font-family="Arial" style:font-family-asian="Arial" style:font-family-complex="Arial" fo:font-size="12pt"/>
    </style:style>
    <style:style style:parent-style-name="852" style:family="paragraph" style:name="P24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70">
      <style:text-properties fo:color="#1f1f1f" fo:font-family="Arial" style:font-family-asian="Arial" style:font-family-complex="Arial" fo:font-size="12pt" fo:font-weight="bold"/>
    </style:style>
    <style:style style:family="paragraph" style:name="P24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71">
      <style:text-properties fo:color="#1f1f1f" fo:font-family="Arial" style:font-family-asian="Arial" style:font-family-complex="Arial" fo:font-size="12pt"/>
    </style:style>
    <style:style style:parent-style-name="852" style:family="paragraph" style:name="P24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72">
      <style:text-properties fo:color="#1f1f1f" fo:font-family="Arial" style:font-family-asian="Arial" style:font-family-complex="Arial" fo:font-size="12pt" fo:font-weight="bold"/>
    </style:style>
    <style:style style:family="paragraph" style:name="P24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73">
      <style:text-properties fo:color="#1f1f1f" fo:font-family="Arial" style:font-family-asian="Arial" style:font-family-complex="Arial" fo:font-size="12pt"/>
    </style:style>
    <style:style style:parent-style-name="851" style:family="paragraph" style:name="P24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74">
      <style:text-properties fo:color="#1f1f1f" fo:font-family="Arial" style:font-family-asian="Arial" style:font-family-complex="Arial" fo:font-size="14pt" fo:font-weight="bold"/>
    </style:style>
    <style:style style:parent-style-name="912" style:list-style-name="WWNum12" style:family="paragraph" style:name="P246">
      <style:paragraph-properties fo:line-height="115%" fo:margin-right="0cm" fo:margin-top="0pt" fo:margin-bottom="0pt" fo:border="none"/>
      <style:text-properties fo:font-family="Arial" style:font-family-asian="Arial" style:font-family-complex="Arial" fo:font-size="12pt"/>
    </style:style>
    <style:style style:family="text" style:name="T875">
      <style:text-properties fo:color="#1f1f1f" fo:font-family="Arial" style:font-family-asian="Arial" style:font-family-complex="Arial" fo:font-size="12pt"/>
    </style:style>
    <style:style style:parent-style-name="912" style:list-style-name="WWNum12" style:family="paragraph" style:name="P247">
      <style:paragraph-properties fo:line-height="115%" fo:margin-right="0cm" fo:margin-top="0pt" fo:margin-bottom="0pt" fo:border="none"/>
      <style:text-properties fo:font-family="Arial" style:font-family-asian="Arial" style:font-family-complex="Arial" fo:font-size="12pt"/>
    </style:style>
    <style:style style:family="text" style:name="T876">
      <style:text-properties fo:color="#1f1f1f" fo:font-family="Arial" style:font-family-asian="Arial" style:font-family-complex="Arial" fo:font-size="12pt"/>
    </style:style>
    <style:style style:parent-style-name="912" style:list-style-name="WWNum12" style:family="paragraph" style:name="P248">
      <style:paragraph-properties fo:line-height="115%" fo:margin-right="0cm" fo:margin-top="0pt" fo:margin-bottom="0pt" fo:border="none"/>
      <style:text-properties fo:font-family="Arial" style:font-family-asian="Arial" style:font-family-complex="Arial" fo:font-size="12pt"/>
    </style:style>
    <style:style style:family="text" style:name="T877">
      <style:text-properties fo:color="#1f1f1f" fo:font-family="Arial" style:font-family-asian="Arial" style:font-family-complex="Arial" fo:font-size="12pt"/>
    </style:style>
    <style:style style:parent-style-name="912" style:list-style-name="WWNum12" style:family="paragraph" style:name="P249">
      <style:paragraph-properties fo:line-height="115%" fo:margin-right="0cm" fo:margin-top="0pt" fo:margin-bottom="0pt" fo:border="none"/>
      <style:text-properties fo:font-family="Arial" style:font-family-asian="Arial" style:font-family-complex="Arial" fo:font-size="12pt"/>
    </style:style>
    <style:style style:family="text" style:name="T878">
      <style:text-properties fo:color="#1f1f1f" fo:font-family="Arial" style:font-family-asian="Arial" style:font-family-complex="Arial" fo:font-size="12pt"/>
    </style:style>
    <style:style style:family="paragraph" style:name="P250">
      <style:paragraph-properties/>
      <style:text-properties/>
    </style:style>
    <style:style style:family="paragraph" style:name="P251">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879">
      <style:text-properties fo:color="#1f1f1f" fo:font-family="Arial" style:font-family-asian="Arial" style:font-family-complex="Arial" fo:font-size="12pt"/>
    </style:style>
    <style:style style:parent-style-name="851" style:family="paragraph" style:name="P25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80">
      <style:text-properties fo:color="#1f1f1f" fo:font-family="Arial" style:font-family-asian="Arial" style:font-family-complex="Arial" fo:font-size="14pt" fo:font-weight="bold"/>
    </style:style>
    <style:style style:family="paragraph" style:name="P25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81">
      <style:text-properties fo:color="#1f1f1f" fo:font-family="Arial" style:font-family-asian="Arial" style:font-family-complex="Arial" fo:font-size="12pt"/>
    </style:style>
    <style:style style:parent-style-name="852" style:family="paragraph" style:name="P25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82">
      <style:text-properties fo:color="#1f1f1f" fo:font-family="Arial" style:font-family-asian="Arial" style:font-family-complex="Arial" fo:font-size="12pt" fo:font-weight="bold"/>
    </style:style>
    <style:style style:family="paragraph" style:name="P25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83">
      <style:text-properties fo:color="#1f1f1f" fo:font-family="Arial" style:font-family-asian="Arial" style:font-family-complex="Arial" fo:font-size="12pt"/>
    </style:style>
    <style:style style:parent-style-name="852" style:family="paragraph" style:name="P25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84">
      <style:text-properties fo:color="#1f1f1f" fo:font-family="Arial" style:font-family-asian="Arial" style:font-family-complex="Arial" fo:font-size="12pt" fo:font-weight="bold"/>
    </style:style>
    <style:style style:family="paragraph" style:name="P25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85">
      <style:text-properties fo:color="#1f1f1f" fo:font-family="Arial" style:font-family-asian="Arial" style:font-family-complex="Arial" fo:font-size="12pt"/>
    </style:style>
    <style:style style:parent-style-name="852" style:family="paragraph" style:name="P25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86">
      <style:text-properties fo:color="#1f1f1f" fo:font-family="Arial" style:font-family-asian="Arial" style:font-family-complex="Arial" fo:font-size="12pt" fo:font-weight="bold"/>
    </style:style>
    <style:style style:family="paragraph" style:name="P25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87">
      <style:text-properties fo:color="#1f1f1f" fo:font-family="Arial" style:font-family-asian="Arial" style:font-family-complex="Arial" fo:font-size="12pt"/>
    </style:style>
    <style:style style:parent-style-name="852" style:family="paragraph" style:name="P26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88">
      <style:text-properties fo:color="#1f1f1f" fo:font-family="Arial" style:font-family-asian="Arial" style:font-family-complex="Arial" fo:font-size="12pt" fo:font-weight="bold"/>
    </style:style>
    <style:style style:family="paragraph" style:name="P26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89">
      <style:text-properties fo:color="#1f1f1f" fo:font-family="Arial" style:font-family-asian="Arial" style:font-family-complex="Arial" fo:font-size="12pt"/>
    </style:style>
    <style:style style:parent-style-name="851" style:family="paragraph" style:name="P26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90">
      <style:text-properties fo:color="#1f1f1f" fo:font-family="Arial" style:font-family-asian="Arial" style:font-family-complex="Arial" fo:font-size="14pt" fo:font-weight="bold"/>
    </style:style>
    <style:style style:parent-style-name="912" style:list-style-name="WWNum13" style:family="paragraph" style:name="P263">
      <style:paragraph-properties fo:line-height="115%" fo:margin-right="0cm" fo:margin-top="0pt" fo:margin-bottom="0pt" fo:border="none"/>
      <style:text-properties fo:font-family="Arial" style:font-family-asian="Arial" style:font-family-complex="Arial" fo:font-size="12pt"/>
    </style:style>
    <style:style style:family="text" style:name="T891">
      <style:text-properties fo:color="#1f1f1f" fo:font-family="Arial" style:font-family-asian="Arial" style:font-family-complex="Arial" fo:font-size="12pt"/>
    </style:style>
    <style:style style:parent-style-name="912" style:list-style-name="WWNum13" style:family="paragraph" style:name="P264">
      <style:paragraph-properties fo:line-height="115%" fo:margin-right="0cm" fo:margin-top="0pt" fo:margin-bottom="0pt" fo:border="none"/>
      <style:text-properties fo:font-family="Arial" style:font-family-asian="Arial" style:font-family-complex="Arial" fo:font-size="12pt"/>
    </style:style>
    <style:style style:family="text" style:name="T892">
      <style:text-properties fo:color="#1f1f1f" fo:font-family="Arial" style:font-family-asian="Arial" style:font-family-complex="Arial" fo:font-size="12pt"/>
    </style:style>
    <style:style style:parent-style-name="912" style:list-style-name="WWNum13" style:family="paragraph" style:name="P265">
      <style:paragraph-properties fo:line-height="115%" fo:margin-right="0cm" fo:margin-top="0pt" fo:margin-bottom="0pt" fo:border="none"/>
      <style:text-properties fo:font-family="Arial" style:font-family-asian="Arial" style:font-family-complex="Arial" fo:font-size="12pt"/>
    </style:style>
    <style:style style:family="text" style:name="T893">
      <style:text-properties fo:color="#1f1f1f" fo:font-family="Arial" style:font-family-asian="Arial" style:font-family-complex="Arial" fo:font-size="12pt"/>
    </style:style>
    <style:style style:parent-style-name="912" style:list-style-name="WWNum13" style:family="paragraph" style:name="P266">
      <style:paragraph-properties fo:line-height="115%" fo:margin-right="0cm" fo:margin-top="0pt" fo:margin-bottom="0pt" fo:border="none"/>
      <style:text-properties fo:font-family="Arial" style:font-family-asian="Arial" style:font-family-complex="Arial" fo:font-size="12pt"/>
    </style:style>
    <style:style style:family="text" style:name="T894">
      <style:text-properties fo:color="#1f1f1f" fo:font-family="Arial" style:font-family-asian="Arial" style:font-family-complex="Arial" fo:font-size="12pt"/>
    </style:style>
    <style:style style:family="paragraph" style:name="P267">
      <style:paragraph-properties/>
      <style:text-properties/>
    </style:style>
    <style:style style:family="paragraph" style:name="P268">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895">
      <style:text-properties fo:color="#1f1f1f" fo:font-family="Arial" style:font-family-asian="Arial" style:font-family-complex="Arial" fo:font-size="12pt"/>
    </style:style>
    <style:style style:parent-style-name="851" style:family="paragraph" style:name="P26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96">
      <style:text-properties fo:color="#1f1f1f" fo:font-family="Arial" style:font-family-asian="Arial" style:font-family-complex="Arial" fo:font-size="14pt" fo:font-weight="bold"/>
    </style:style>
    <style:style style:family="paragraph" style:name="P27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97">
      <style:text-properties fo:color="#1f1f1f" fo:font-family="Arial" style:font-family-asian="Arial" style:font-family-complex="Arial" fo:font-size="12pt"/>
    </style:style>
    <style:style style:parent-style-name="852" style:family="paragraph" style:name="P27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898">
      <style:text-properties fo:color="#1f1f1f" fo:font-family="Arial" style:font-family-asian="Arial" style:font-family-complex="Arial" fo:font-size="12pt" fo:font-weight="bold"/>
    </style:style>
    <style:style style:family="paragraph" style:name="P27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899">
      <style:text-properties fo:color="#1f1f1f" fo:font-family="Arial" style:font-family-asian="Arial" style:font-family-complex="Arial" fo:font-size="12pt"/>
    </style:style>
    <style:style style:family="text" style:name="T900">
      <style:text-properties fo:color="#1f1f1f" fo:font-family="Arial" style:font-family-asian="Arial" style:font-family-complex="Arial" fo:font-size="12pt"/>
    </style:style>
    <style:style style:parent-style-name="852" style:family="paragraph" style:name="P27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01">
      <style:text-properties fo:color="#1f1f1f" fo:font-family="Arial" style:font-family-asian="Arial" style:font-family-complex="Arial" fo:font-size="12pt" fo:font-weight="bold"/>
    </style:style>
    <style:style style:family="paragraph" style:name="P27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02">
      <style:text-properties fo:color="#1f1f1f" fo:font-family="Arial" style:font-family-asian="Arial" style:font-family-complex="Arial" fo:font-size="12pt"/>
    </style:style>
    <style:style style:family="text" style:name="T903">
      <style:text-properties fo:color="#1f1f1f" fo:font-family="Arial" style:font-family-asian="Arial" style:font-family-complex="Arial" fo:font-size="12pt"/>
    </style:style>
    <style:style style:parent-style-name="852" style:family="paragraph" style:name="P27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04">
      <style:text-properties fo:color="#1f1f1f" fo:font-family="Arial" style:font-family-asian="Arial" style:font-family-complex="Arial" fo:font-size="12pt" fo:font-weight="bold"/>
    </style:style>
    <style:style style:family="paragraph" style:name="P27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05">
      <style:text-properties fo:color="#1f1f1f" fo:font-family="Arial" style:font-family-asian="Arial" style:font-family-complex="Arial" fo:font-size="12pt"/>
    </style:style>
    <style:style style:family="text" style:name="T906">
      <style:text-properties fo:color="#1f1f1f" fo:font-family="Arial" style:font-family-asian="Arial" style:font-family-complex="Arial" fo:font-size="12pt"/>
    </style:style>
    <style:style style:parent-style-name="852" style:family="paragraph" style:name="P27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07">
      <style:text-properties fo:color="#1f1f1f" fo:font-family="Arial" style:font-family-asian="Arial" style:font-family-complex="Arial" fo:font-size="12pt" fo:font-weight="bold"/>
    </style:style>
    <style:style style:family="paragraph" style:name="P27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08">
      <style:text-properties fo:color="#1f1f1f" fo:font-family="Arial" style:font-family-asian="Arial" style:font-family-complex="Arial" fo:font-size="12pt"/>
    </style:style>
    <style:style style:family="text" style:name="T909">
      <style:text-properties fo:color="#1f1f1f" fo:font-family="Arial" style:font-family-asian="Arial" style:font-family-complex="Arial" fo:font-size="12pt"/>
    </style:style>
    <style:style style:parent-style-name="851" style:family="paragraph" style:name="P27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10">
      <style:text-properties fo:color="#1f1f1f" fo:font-family="Arial" style:font-family-asian="Arial" style:font-family-complex="Arial" fo:font-size="14pt" fo:font-weight="bold"/>
    </style:style>
    <style:style style:parent-style-name="912" style:list-style-name="WWNum14" style:family="paragraph" style:name="P280">
      <style:paragraph-properties fo:line-height="115%" fo:margin-right="0cm" fo:margin-top="0pt" fo:margin-bottom="0pt" fo:border="none"/>
      <style:text-properties fo:font-family="Arial" style:font-family-asian="Arial" style:font-family-complex="Arial" fo:font-size="12pt"/>
    </style:style>
    <style:style style:family="text" style:name="T911">
      <style:text-properties fo:color="#1f1f1f" fo:font-family="Arial" style:font-family-asian="Arial" style:font-family-complex="Arial" fo:font-size="12pt"/>
    </style:style>
    <style:style style:parent-style-name="912" style:list-style-name="WWNum14" style:family="paragraph" style:name="P281">
      <style:paragraph-properties fo:line-height="115%" fo:margin-right="0cm" fo:margin-top="0pt" fo:margin-bottom="0pt" fo:border="none"/>
      <style:text-properties fo:font-family="Arial" style:font-family-asian="Arial" style:font-family-complex="Arial" fo:font-size="12pt"/>
    </style:style>
    <style:style style:family="text" style:name="T912">
      <style:text-properties fo:color="#1f1f1f" fo:font-family="Arial" style:font-family-asian="Arial" style:font-family-complex="Arial" fo:font-size="12pt"/>
    </style:style>
    <style:style style:parent-style-name="912" style:list-style-name="WWNum14" style:family="paragraph" style:name="P282">
      <style:paragraph-properties fo:line-height="115%" fo:margin-right="0cm" fo:margin-top="0pt" fo:margin-bottom="0pt" fo:border="none"/>
      <style:text-properties fo:font-family="Arial" style:font-family-asian="Arial" style:font-family-complex="Arial" fo:font-size="12pt"/>
    </style:style>
    <style:style style:family="text" style:name="T913">
      <style:text-properties fo:color="#1f1f1f" fo:font-family="Arial" style:font-family-asian="Arial" style:font-family-complex="Arial" fo:font-size="12pt"/>
    </style:style>
    <style:style style:parent-style-name="912" style:list-style-name="WWNum14" style:family="paragraph" style:name="P283">
      <style:paragraph-properties fo:line-height="115%" fo:margin-right="0cm" fo:margin-top="0pt" fo:margin-bottom="0pt" fo:border="none"/>
      <style:text-properties fo:font-family="Arial" style:font-family-asian="Arial" style:font-family-complex="Arial" fo:font-size="12pt"/>
    </style:style>
    <style:style style:family="text" style:name="T914">
      <style:text-properties fo:color="#1f1f1f" fo:font-family="Arial" style:font-family-asian="Arial" style:font-family-complex="Arial" fo:font-size="12pt"/>
    </style:style>
    <style:style style:family="paragraph" style:name="P284">
      <style:paragraph-properties/>
      <style:text-properties/>
    </style:style>
    <style:style style:parent-style-name="851" style:family="paragraph" style:name="P285">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15">
      <style:text-properties fo:color="#1f1f1f" fo:font-family="Arial" style:font-family-asian="Arial" style:font-family-complex="Arial" fo:font-size="14pt" fo:font-weight="bold"/>
    </style:style>
    <style:style style:family="paragraph" style:name="P28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16">
      <style:text-properties fo:color="#1f1f1f" fo:font-family="Arial" style:font-family-asian="Arial" style:font-family-complex="Arial" fo:font-size="12pt"/>
    </style:style>
    <style:style style:parent-style-name="852" style:family="paragraph" style:name="P28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17">
      <style:text-properties fo:color="#1f1f1f" fo:font-family="Arial" style:font-family-asian="Arial" style:font-family-complex="Arial" fo:font-size="12pt" fo:font-weight="bold"/>
    </style:style>
    <style:style style:family="paragraph" style:name="P28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18">
      <style:text-properties fo:color="#1f1f1f" fo:font-family="Arial" style:font-family-asian="Arial" style:font-family-complex="Arial" fo:font-size="12pt"/>
    </style:style>
    <style:style style:parent-style-name="852" style:family="paragraph" style:name="P28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19">
      <style:text-properties fo:color="#1f1f1f" fo:font-family="Arial" style:font-family-asian="Arial" style:font-family-complex="Arial" fo:font-size="12pt" fo:font-weight="bold"/>
    </style:style>
    <style:style style:family="paragraph" style:name="P29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20">
      <style:text-properties fo:color="#1f1f1f" fo:font-family="Arial" style:font-family-asian="Arial" style:font-family-complex="Arial" fo:font-size="12pt"/>
    </style:style>
    <style:style style:family="table" style:name="ta3">
      <style:paragraph-properties fo:line-height="100%" fo:margin-bottom="0pt"/>
      <style:table-properties style:width="10.83cm" fo:margin-left="0cm" table:align="left" style:use-optimal-column-width="true"/>
    </style:style>
    <style:style style:family="table-column" style:name="co6">
      <style:table-column-properties style:column-width="1.903cm" style:use-optimal-column-width="true"/>
    </style:style>
    <style:style style:family="table-column" style:name="co7">
      <style:table-column-properties style:column-width="4.126cm" style:use-optimal-column-width="true"/>
    </style:style>
    <style:style style:family="table-column" style:name="co8">
      <style:table-column-properties style:column-width="4.8cm" style:use-optimal-column-width="true"/>
    </style:style>
    <style:style style:family="table-row" style:name="ro9">
      <style:table-row-properties/>
    </style:style>
    <style:style style:family="table-cell" style:name="ce2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1">
      <style:paragraph-properties style:line-height-at-least="12pt" fo:margin-top="0pt" fo:margin-bottom="0pt"/>
      <style:text-properties/>
    </style:style>
    <style:style style:family="text" style:name="T921">
      <style:text-properties fo:color="#1f1f1f" fo:font-family="Arial" style:font-family-asian="Arial" style:font-family-complex="Arial" fo:font-size="12pt" fo:font-weight="bold"/>
    </style:style>
    <style:style style:family="table-cell" style:name="ce2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2">
      <style:paragraph-properties style:line-height-at-least="12pt" fo:margin-top="0pt" fo:margin-bottom="0pt"/>
      <style:text-properties/>
    </style:style>
    <style:style style:family="text" style:name="T922">
      <style:text-properties fo:color="#1f1f1f" fo:font-family="Arial" style:font-family-asian="Arial" style:font-family-complex="Arial" fo:font-size="12pt" fo:font-weight="bold"/>
    </style:style>
    <style:style style:family="table-cell" style:name="ce2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3">
      <style:paragraph-properties style:line-height-at-least="12pt" fo:margin-top="0pt" fo:margin-bottom="0pt"/>
      <style:text-properties/>
    </style:style>
    <style:style style:family="text" style:name="T923">
      <style:text-properties fo:color="#1f1f1f" fo:font-family="Arial" style:font-family-asian="Arial" style:font-family-complex="Arial" fo:font-size="12pt" fo:font-weight="bold"/>
    </style:style>
    <style:style style:family="table-row" style:name="ro10">
      <style:table-row-properties/>
    </style:style>
    <style:style style:family="table-cell" style:name="ce2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4">
      <style:paragraph-properties style:line-height-at-least="12pt" fo:margin-top="0pt" fo:margin-bottom="0pt"/>
      <style:text-properties/>
    </style:style>
    <style:style style:family="text" style:name="T924">
      <style:text-properties fo:color="#1f1f1f" fo:font-family="Arial" style:font-family-asian="Arial" style:font-family-complex="Arial" fo:font-size="12pt"/>
    </style:style>
    <style:style style:family="table-cell" style:name="ce2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5">
      <style:paragraph-properties style:line-height-at-least="12pt" fo:margin-top="0pt" fo:margin-bottom="0pt"/>
      <style:text-properties/>
    </style:style>
    <style:style style:family="text" style:name="T925">
      <style:text-properties fo:color="#1f1f1f" fo:font-family="Arial" style:font-family-asian="Arial" style:font-family-complex="Arial" fo:font-size="12pt"/>
    </style:style>
    <style:style style:family="table-cell" style:name="ce2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6">
      <style:paragraph-properties style:line-height-at-least="12pt" fo:margin-top="0pt" fo:margin-bottom="0pt"/>
      <style:text-properties/>
    </style:style>
    <style:style style:family="text" style:name="T926">
      <style:text-properties fo:color="#1f1f1f" fo:font-family="Arial" style:font-family-asian="Arial" style:font-family-complex="Arial" fo:font-size="12pt"/>
    </style:style>
    <style:style style:family="table-row" style:name="ro11">
      <style:table-row-properties/>
    </style:style>
    <style:style style:family="table-cell" style:name="ce3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7">
      <style:paragraph-properties style:line-height-at-least="12pt" fo:margin-top="0pt" fo:margin-bottom="0pt"/>
      <style:text-properties/>
    </style:style>
    <style:style style:family="text" style:name="T927">
      <style:text-properties fo:color="#1f1f1f" fo:font-family="Arial" style:font-family-asian="Arial" style:font-family-complex="Arial" fo:font-size="12pt"/>
    </style:style>
    <style:style style:family="table-cell" style:name="ce3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8">
      <style:paragraph-properties style:line-height-at-least="12pt" fo:margin-top="0pt" fo:margin-bottom="0pt"/>
      <style:text-properties/>
    </style:style>
    <style:style style:family="text" style:name="T928">
      <style:text-properties fo:color="#1f1f1f" fo:font-family="Arial" style:font-family-asian="Arial" style:font-family-complex="Arial" fo:font-size="12pt"/>
    </style:style>
    <style:style style:family="table-cell" style:name="ce3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9">
      <style:paragraph-properties style:line-height-at-least="12pt" fo:margin-top="0pt" fo:margin-bottom="0pt"/>
      <style:text-properties/>
    </style:style>
    <style:style style:family="text" style:name="T929">
      <style:text-properties fo:color="#1f1f1f" fo:font-family="Arial" style:font-family-asian="Arial" style:font-family-complex="Arial" fo:font-size="12pt"/>
    </style:style>
    <style:style style:parent-style-name="912" style:list-style-name="WWNum15" style:family="paragraph" style:name="P300">
      <style:paragraph-properties fo:line-height="115%" fo:margin-right="0cm" fo:margin-top="0pt" fo:margin-bottom="0pt" fo:border="none"/>
      <style:text-properties fo:font-family="Arial" style:font-family-asian="Arial" style:font-family-complex="Arial" fo:font-size="12pt"/>
    </style:style>
    <style:style style:family="text" style:name="T930">
      <style:text-properties fo:color="#1f1f1f" fo:font-family="Arial" style:font-family-asian="Arial" style:font-family-complex="Arial" fo:font-size="12pt"/>
    </style:style>
    <style:style style:parent-style-name="912" style:list-style-name="WWNum15" style:family="paragraph" style:name="P301">
      <style:paragraph-properties fo:line-height="115%" fo:margin-right="0cm" fo:margin-top="0pt" fo:margin-bottom="0pt" fo:border="none"/>
      <style:text-properties fo:font-family="Arial" style:font-family-asian="Arial" style:font-family-complex="Arial" fo:font-size="12pt"/>
    </style:style>
    <style:style style:family="text" style:name="T931">
      <style:text-properties fo:color="#1f1f1f" fo:font-family="Arial" style:font-family-asian="Arial" style:font-family-complex="Arial" fo:font-size="12pt"/>
    </style:style>
    <style:style style:parent-style-name="851" style:family="paragraph" style:name="P30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32">
      <style:text-properties fo:color="#1f1f1f" fo:font-family="Arial" style:font-family-asian="Arial" style:font-family-complex="Arial" fo:font-size="14pt" fo:font-weight="bold"/>
    </style:style>
    <style:style style:parent-style-name="912" style:list-style-name="WWNum15" style:family="paragraph" style:name="P303">
      <style:paragraph-properties fo:line-height="115%" fo:margin-right="0cm" fo:margin-top="0pt" fo:margin-bottom="0pt" fo:border="none"/>
      <style:text-properties fo:font-family="Arial" style:font-family-asian="Arial" style:font-family-complex="Arial" fo:font-size="12pt"/>
    </style:style>
    <style:style style:family="text" style:name="T933">
      <style:text-properties fo:color="#1f1f1f" fo:font-family="Arial" style:font-family-asian="Arial" style:font-family-complex="Arial" fo:font-size="12pt"/>
    </style:style>
    <style:style style:parent-style-name="912" style:list-style-name="WWNum15" style:family="paragraph" style:name="P304">
      <style:paragraph-properties fo:line-height="115%" fo:margin-right="0cm" fo:margin-top="0pt" fo:margin-bottom="0pt" fo:border="none"/>
      <style:text-properties fo:font-family="Arial" style:font-family-asian="Arial" style:font-family-complex="Arial" fo:font-size="12pt"/>
    </style:style>
    <style:style style:family="text" style:name="T934">
      <style:text-properties fo:color="#1f1f1f" fo:font-family="Arial" style:font-family-asian="Arial" style:font-family-complex="Arial" fo:font-size="12pt"/>
    </style:style>
    <style:style style:parent-style-name="912" style:list-style-name="WWNum15" style:family="paragraph" style:name="P305">
      <style:paragraph-properties fo:line-height="115%" fo:margin-right="0cm" fo:margin-top="0pt" fo:margin-bottom="0pt" fo:border="none"/>
      <style:text-properties fo:font-family="Arial" style:font-family-asian="Arial" style:font-family-complex="Arial" fo:font-size="12pt"/>
    </style:style>
    <style:style style:family="text" style:name="T935">
      <style:text-properties fo:color="#1f1f1f" fo:font-family="Arial" style:font-family-asian="Arial" style:font-family-complex="Arial" fo:font-size="12pt"/>
    </style:style>
    <style:style style:parent-style-name="912" style:list-style-name="WWNum15" style:family="paragraph" style:name="P306">
      <style:paragraph-properties fo:line-height="115%" fo:margin-right="0cm" fo:margin-top="0pt" fo:margin-bottom="0pt" fo:border="none"/>
      <style:text-properties fo:font-family="Arial" style:font-family-asian="Arial" style:font-family-complex="Arial" fo:font-size="12pt"/>
    </style:style>
    <style:style style:family="text" style:name="T936">
      <style:text-properties fo:color="#1f1f1f" fo:font-family="Arial" style:font-family-asian="Arial" style:font-family-complex="Arial" fo:font-size="12pt"/>
    </style:style>
    <style:style style:family="paragraph" style:name="P307">
      <style:paragraph-properties/>
      <style:text-properties/>
    </style:style>
    <style:style style:family="paragraph" style:name="P308">
      <style:paragraph-properties fo:break-before="page"/>
      <style:text-properties/>
    </style:style>
    <style:style style:family="text" style:name="T937">
      <style:text-properties/>
    </style:style>
    <style:style style:family="text" style:name="T938">
      <style:text-properties/>
    </style:style>
    <style:style style:family="text" style:name="T939">
      <style:text-properties/>
    </style:style>
    <style:style style:family="paragraph" style:name="P30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40">
      <style:text-properties fo:color="#1f1f1f" fo:font-family="Arial" style:font-family-asian="Arial" style:font-family-complex="Arial" fo:font-size="12pt"/>
    </style:style>
    <style:style style:parent-style-name="851" style:family="paragraph" style:name="P31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41">
      <style:text-properties fo:color="#1f1f1f" fo:font-family="Arial" style:font-family-asian="Arial" style:font-family-complex="Arial" fo:font-size="14pt" fo:font-weight="bold"/>
    </style:style>
    <style:style style:family="paragraph" style:name="P31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42">
      <style:text-properties fo:color="#1f1f1f" fo:font-family="Arial" style:font-family-asian="Arial" style:font-family-complex="Arial" fo:font-size="12pt"/>
    </style:style>
    <style:style style:parent-style-name="852" style:family="paragraph" style:name="P31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43">
      <style:text-properties fo:color="#1f1f1f" fo:font-family="Arial" style:font-family-asian="Arial" style:font-family-complex="Arial" fo:font-size="12pt" fo:font-weight="bold"/>
    </style:style>
    <style:style style:family="paragraph" style:name="P31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44">
      <style:text-properties fo:color="#1f1f1f" fo:font-family="Arial" style:font-family-asian="Arial" style:font-family-complex="Arial" fo:font-size="12pt"/>
    </style:style>
    <style:style style:parent-style-name="852" style:family="paragraph" style:name="P31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45">
      <style:text-properties fo:color="#1f1f1f" fo:font-family="Arial" style:font-family-asian="Arial" style:font-family-complex="Arial" fo:font-size="12pt" fo:font-weight="bold"/>
    </style:style>
    <style:style style:family="paragraph" style:name="P31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46">
      <style:text-properties fo:color="#1f1f1f" fo:font-family="Arial" style:font-family-asian="Arial" style:font-family-complex="Arial" fo:font-size="12pt"/>
    </style:style>
    <style:style style:family="paragraph" style:name="P31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47">
      <style:text-properties fo:color="#1f1f1f" fo:font-family="Arial" style:font-family-asian="Arial" style:font-family-complex="Arial" fo:font-size="12pt" fo:font-weight="bold"/>
    </style:style>
    <style:style style:parent-style-name="912" style:list-style-name="WWNum16" style:family="paragraph" style:name="P317">
      <style:paragraph-properties fo:line-height="115%" fo:margin-right="0cm" fo:margin-top="0pt" fo:margin-bottom="0pt" fo:border="none"/>
      <style:text-properties fo:font-family="Arial" style:font-family-asian="Arial" style:font-family-complex="Arial" fo:font-size="12pt"/>
    </style:style>
    <style:style style:family="text" style:name="T948">
      <style:text-properties fo:color="#1f1f1f" fo:font-family="Arial" style:font-family-asian="Arial" style:font-family-complex="Arial" fo:font-size="12pt"/>
    </style:style>
    <style:style style:parent-style-name="912" style:list-style-name="WWNum16" style:family="paragraph" style:name="P318">
      <style:paragraph-properties fo:line-height="115%" fo:margin-right="0cm" fo:margin-top="0pt" fo:margin-bottom="0pt" fo:border="none"/>
      <style:text-properties fo:font-family="Arial" style:font-family-asian="Arial" style:font-family-complex="Arial" fo:font-size="12pt"/>
    </style:style>
    <style:style style:family="text" style:name="T949">
      <style:text-properties fo:color="#1f1f1f" fo:font-family="Arial" style:font-family-asian="Arial" style:font-family-complex="Arial" fo:font-size="12pt"/>
    </style:style>
    <style:style style:parent-style-name="912" style:list-style-name="WWNum16" style:family="paragraph" style:name="P319">
      <style:paragraph-properties fo:line-height="115%" fo:margin-right="0cm" fo:margin-top="0pt" fo:margin-bottom="0pt" fo:border="none"/>
      <style:text-properties fo:font-family="Arial" style:font-family-asian="Arial" style:font-family-complex="Arial" fo:font-size="12pt"/>
    </style:style>
    <style:style style:family="text" style:name="T950">
      <style:text-properties fo:color="#1f1f1f" fo:font-family="Arial" style:font-family-asian="Arial" style:font-family-complex="Arial" fo:font-size="12pt"/>
    </style:style>
    <style:style style:parent-style-name="852" style:family="paragraph" style:name="P32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51">
      <style:text-properties fo:color="#1f1f1f" fo:font-family="Arial" style:font-family-asian="Arial" style:font-family-complex="Arial" fo:font-size="12pt" fo:font-weight="bold"/>
    </style:style>
    <style:style style:family="paragraph" style:name="P3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52">
      <style:text-properties fo:color="#1f1f1f" fo:font-family="Arial" style:font-family-asian="Arial" style:font-family-complex="Arial" fo:font-size="12pt"/>
    </style:style>
    <style:style style:parent-style-name="852" style:family="paragraph" style:name="P32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53">
      <style:text-properties fo:color="#1f1f1f" fo:font-family="Arial" style:font-family-asian="Arial" style:font-family-complex="Arial" fo:font-size="12pt" fo:font-weight="bold"/>
    </style:style>
    <style:style style:family="paragraph" style:name="P32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54">
      <style:text-properties fo:color="#1f1f1f" fo:font-family="Arial" style:font-family-asian="Arial" style:font-family-complex="Arial" fo:font-size="12pt"/>
    </style:style>
    <style:style style:parent-style-name="851" style:family="paragraph" style:name="P32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55">
      <style:text-properties fo:color="#1f1f1f" fo:font-family="Arial" style:font-family-asian="Arial" style:font-family-complex="Arial" fo:font-size="14pt" fo:font-weight="bold"/>
    </style:style>
    <style:style style:parent-style-name="912" style:list-style-name="WWNum16" style:family="paragraph" style:name="P325">
      <style:paragraph-properties fo:line-height="115%" fo:margin-right="0cm" fo:margin-top="0pt" fo:margin-bottom="0pt" fo:border="none"/>
      <style:text-properties fo:font-family="Arial" style:font-family-asian="Arial" style:font-family-complex="Arial" fo:font-size="12pt"/>
    </style:style>
    <style:style style:family="text" style:name="T956">
      <style:text-properties fo:color="#1f1f1f" fo:font-family="Arial" style:font-family-asian="Arial" style:font-family-complex="Arial" fo:font-size="12pt"/>
    </style:style>
    <style:style style:parent-style-name="912" style:list-style-name="WWNum16" style:family="paragraph" style:name="P326">
      <style:paragraph-properties fo:line-height="115%" fo:margin-right="0cm" fo:margin-top="0pt" fo:margin-bottom="0pt" fo:border="none"/>
      <style:text-properties fo:font-family="Arial" style:font-family-asian="Arial" style:font-family-complex="Arial" fo:font-size="12pt"/>
    </style:style>
    <style:style style:family="text" style:name="T957">
      <style:text-properties fo:color="#1f1f1f" fo:font-family="Arial" style:font-family-asian="Arial" style:font-family-complex="Arial" fo:font-size="12pt"/>
    </style:style>
    <style:style style:parent-style-name="912" style:list-style-name="WWNum16" style:family="paragraph" style:name="P327">
      <style:paragraph-properties fo:line-height="115%" fo:margin-right="0cm" fo:margin-top="0pt" fo:margin-bottom="0pt" fo:border="none"/>
      <style:text-properties fo:font-family="Arial" style:font-family-asian="Arial" style:font-family-complex="Arial" fo:font-size="12pt"/>
    </style:style>
    <style:style style:family="text" style:name="T958">
      <style:text-properties fo:color="#1f1f1f" fo:font-family="Arial" style:font-family-asian="Arial" style:font-family-complex="Arial" fo:font-size="12pt"/>
    </style:style>
    <style:style style:parent-style-name="912" style:list-style-name="WWNum16" style:family="paragraph" style:name="P328">
      <style:paragraph-properties fo:line-height="115%" fo:margin-right="0cm" fo:margin-top="0pt" fo:margin-bottom="0pt" fo:border="none"/>
      <style:text-properties fo:font-family="Arial" style:font-family-asian="Arial" style:font-family-complex="Arial" fo:font-size="12pt"/>
    </style:style>
    <style:style style:family="text" style:name="T959">
      <style:text-properties fo:color="#1f1f1f" fo:font-family="Arial" style:font-family-asian="Arial" style:font-family-complex="Arial" fo:font-size="12pt"/>
    </style:style>
    <style:style style:family="paragraph" style:name="P329">
      <style:paragraph-properties/>
      <style:text-properties/>
    </style:style>
    <style:style style:family="paragraph" style:name="P330">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960">
      <style:text-properties fo:color="#1f1f1f" fo:font-family="Arial" style:font-family-asian="Arial" style:font-family-complex="Arial" fo:font-size="12pt"/>
    </style:style>
    <style:style style:parent-style-name="851" style:family="paragraph" style:name="P33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61">
      <style:text-properties fo:color="#1f1f1f" fo:font-family="Arial" style:font-family-asian="Arial" style:font-family-complex="Arial" fo:font-size="14pt" fo:font-weight="bold"/>
    </style:style>
    <style:style style:family="paragraph" style:name="P33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62">
      <style:text-properties fo:color="#1f1f1f" fo:font-family="Arial" style:font-family-asian="Arial" style:font-family-complex="Arial" fo:font-size="12pt"/>
    </style:style>
    <style:style style:parent-style-name="852" style:family="paragraph" style:name="P33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63">
      <style:text-properties fo:color="#1f1f1f" fo:font-family="Arial" style:font-family-asian="Arial" style:font-family-complex="Arial" fo:font-size="12pt" fo:font-weight="bold"/>
    </style:style>
    <style:style style:family="paragraph" style:name="P33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64">
      <style:text-properties fo:color="#1f1f1f" fo:font-family="Arial" style:font-family-asian="Arial" style:font-family-complex="Arial" fo:font-size="12pt"/>
    </style:style>
    <style:style style:parent-style-name="852" style:family="paragraph" style:name="P33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65">
      <style:text-properties fo:color="#1f1f1f" fo:font-family="Arial" style:font-family-asian="Arial" style:font-family-complex="Arial" fo:font-size="12pt" fo:font-weight="bold"/>
    </style:style>
    <style:style style:family="paragraph" style:name="P3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66">
      <style:text-properties fo:color="#1f1f1f" fo:font-family="Arial" style:font-family-asian="Arial" style:font-family-complex="Arial" fo:font-size="12pt"/>
    </style:style>
    <style:style style:parent-style-name="852" style:family="paragraph" style:name="P33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67">
      <style:text-properties fo:color="#1f1f1f" fo:font-family="Arial" style:font-family-asian="Arial" style:font-family-complex="Arial" fo:font-size="12pt" fo:font-weight="bold"/>
    </style:style>
    <style:style style:family="paragraph" style:name="P33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68">
      <style:text-properties fo:color="#1f1f1f" fo:font-family="Arial" style:font-family-asian="Arial" style:font-family-complex="Arial" fo:font-size="12pt"/>
    </style:style>
    <style:style style:parent-style-name="852" style:family="paragraph" style:name="P3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69">
      <style:text-properties fo:color="#1f1f1f" fo:font-family="Arial" style:font-family-asian="Arial" style:font-family-complex="Arial" fo:font-size="12pt" fo:font-weight="bold"/>
    </style:style>
    <style:style style:family="paragraph" style:name="P3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70">
      <style:text-properties fo:color="#1f1f1f" fo:font-family="Arial" style:font-family-asian="Arial" style:font-family-complex="Arial" fo:font-size="12pt"/>
    </style:style>
    <style:style style:parent-style-name="851" style:family="paragraph" style:name="P3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71">
      <style:text-properties fo:color="#1f1f1f" fo:font-family="Arial" style:font-family-asian="Arial" style:font-family-complex="Arial" fo:font-size="14pt" fo:font-weight="bold"/>
    </style:style>
    <style:style style:parent-style-name="912" style:list-style-name="WWNum17" style:family="paragraph" style:name="P342">
      <style:paragraph-properties fo:line-height="115%" fo:margin-right="0cm" fo:margin-top="0pt" fo:margin-bottom="0pt" fo:border="none"/>
      <style:text-properties fo:font-family="Arial" style:font-family-asian="Arial" style:font-family-complex="Arial" fo:font-size="12pt"/>
    </style:style>
    <style:style style:family="text" style:name="T972">
      <style:text-properties fo:color="#1f1f1f" fo:font-family="Arial" style:font-family-asian="Arial" style:font-family-complex="Arial" fo:font-size="12pt"/>
    </style:style>
    <style:style style:parent-style-name="912" style:list-style-name="WWNum17" style:family="paragraph" style:name="P343">
      <style:paragraph-properties fo:line-height="115%" fo:margin-right="0cm" fo:margin-top="0pt" fo:margin-bottom="0pt" fo:border="none"/>
      <style:text-properties fo:font-family="Arial" style:font-family-asian="Arial" style:font-family-complex="Arial" fo:font-size="12pt"/>
    </style:style>
    <style:style style:family="text" style:name="T973">
      <style:text-properties fo:color="#1f1f1f" fo:font-family="Arial" style:font-family-asian="Arial" style:font-family-complex="Arial" fo:font-size="12pt"/>
    </style:style>
    <style:style style:parent-style-name="912" style:list-style-name="WWNum17" style:family="paragraph" style:name="P344">
      <style:paragraph-properties fo:line-height="115%" fo:margin-right="0cm" fo:margin-top="0pt" fo:margin-bottom="0pt" fo:border="none"/>
      <style:text-properties fo:font-family="Arial" style:font-family-asian="Arial" style:font-family-complex="Arial" fo:font-size="12pt"/>
    </style:style>
    <style:style style:family="text" style:name="T974">
      <style:text-properties fo:color="#1f1f1f" fo:font-family="Arial" style:font-family-asian="Arial" style:font-family-complex="Arial" fo:font-size="12pt"/>
    </style:style>
    <style:style style:parent-style-name="912" style:list-style-name="WWNum17" style:family="paragraph" style:name="P345">
      <style:paragraph-properties fo:line-height="115%" fo:margin-right="0cm" fo:margin-top="0pt" fo:margin-bottom="0pt" fo:border="none"/>
      <style:text-properties fo:font-family="Arial" style:font-family-asian="Arial" style:font-family-complex="Arial" fo:font-size="12pt"/>
    </style:style>
    <style:style style:family="text" style:name="T975">
      <style:text-properties fo:color="#1f1f1f" fo:font-family="Arial" style:font-family-asian="Arial" style:font-family-complex="Arial" fo:font-size="12pt"/>
    </style:style>
    <style:style style:family="paragraph" style:name="P346">
      <style:paragraph-properties/>
      <style:text-properties/>
    </style:style>
    <style:style style:parent-style-name="851" style:family="paragraph" style:name="P34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76">
      <style:text-properties fo:color="#1f1f1f" fo:font-family="Arial" style:font-family-asian="Arial" style:font-family-complex="Arial" fo:font-size="14pt" fo:font-weight="bold"/>
    </style:style>
    <style:style style:family="paragraph" style:name="P34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77">
      <style:text-properties fo:color="#1f1f1f" fo:font-family="Arial" style:font-family-asian="Arial" style:font-family-complex="Arial" fo:font-size="12pt"/>
    </style:style>
    <style:style style:parent-style-name="852" style:family="paragraph" style:name="P34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78">
      <style:text-properties fo:color="#1f1f1f" fo:font-family="Arial" style:font-family-asian="Arial" style:font-family-complex="Arial" fo:font-size="12pt" fo:font-weight="bold"/>
    </style:style>
    <style:style style:family="paragraph" style:name="P35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79">
      <style:text-properties fo:color="#1f1f1f" fo:font-family="Arial" style:font-family-asian="Arial" style:font-family-complex="Arial" fo:font-size="12pt"/>
    </style:style>
    <style:style style:parent-style-name="852" style:family="paragraph" style:name="P35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80">
      <style:text-properties fo:color="#1f1f1f" fo:font-family="Arial" style:font-family-asian="Arial" style:font-family-complex="Arial" fo:font-size="12pt" fo:font-weight="bold"/>
    </style:style>
    <style:style style:family="paragraph" style:name="P35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81">
      <style:text-properties fo:color="#1f1f1f" fo:font-family="Arial" style:font-family-asian="Arial" style:font-family-complex="Arial" fo:font-size="12pt"/>
    </style:style>
    <style:style style:family="text" style:name="T982">
      <style:text-properties fo:color="#1f1f1f" fo:font-family="Arial" style:font-family-asian="Arial" style:font-family-complex="Arial" fo:font-size="12pt"/>
    </style:style>
    <style:style style:parent-style-name="852" style:family="paragraph" style:name="P35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83">
      <style:text-properties fo:color="#1f1f1f" fo:font-family="Arial" style:font-family-asian="Arial" style:font-family-complex="Arial" fo:font-size="12pt" fo:font-weight="bold"/>
    </style:style>
    <style:style style:family="paragraph" style:name="P35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84">
      <style:text-properties fo:color="#1f1f1f" fo:font-family="Arial" style:font-family-asian="Arial" style:font-family-complex="Arial" fo:font-size="12pt"/>
    </style:style>
    <style:style style:family="text" style:name="T985">
      <style:text-properties fo:color="#1f1f1f" fo:font-family="Arial" style:font-family-asian="Arial" style:font-family-complex="Arial" fo:font-size="12pt"/>
    </style:style>
    <style:style style:parent-style-name="852" style:family="paragraph" style:name="P35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86">
      <style:text-properties fo:color="#1f1f1f" fo:font-family="Arial" style:font-family-asian="Arial" style:font-family-complex="Arial" fo:font-size="12pt" fo:font-weight="bold"/>
    </style:style>
    <style:style style:family="paragraph" style:name="P35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87">
      <style:text-properties fo:color="#1f1f1f" fo:font-family="Arial" style:font-family-asian="Arial" style:font-family-complex="Arial" fo:font-size="12pt"/>
    </style:style>
    <style:style style:family="text" style:name="T988">
      <style:text-properties fo:color="#1f1f1f" fo:font-family="Arial" style:font-family-asian="Arial" style:font-family-complex="Arial" fo:font-size="12pt"/>
    </style:style>
    <style:style style:parent-style-name="851" style:family="paragraph" style:name="P35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89">
      <style:text-properties fo:color="#1f1f1f" fo:font-family="Arial" style:font-family-asian="Arial" style:font-family-complex="Arial" fo:font-size="14pt" fo:font-weight="bold"/>
    </style:style>
    <style:style style:parent-style-name="912" style:list-style-name="WWNum18" style:family="paragraph" style:name="P358">
      <style:paragraph-properties fo:line-height="115%" fo:margin-right="0cm" fo:margin-top="0pt" fo:margin-bottom="0pt" fo:border="none"/>
      <style:text-properties fo:font-family="Arial" style:font-family-asian="Arial" style:font-family-complex="Arial" fo:font-size="12pt"/>
    </style:style>
    <style:style style:family="text" style:name="T990">
      <style:text-properties fo:color="#1f1f1f" fo:font-family="Arial" style:font-family-asian="Arial" style:font-family-complex="Arial" fo:font-size="12pt"/>
    </style:style>
    <style:style style:parent-style-name="912" style:list-style-name="WWNum18" style:family="paragraph" style:name="P359">
      <style:paragraph-properties fo:line-height="115%" fo:margin-right="0cm" fo:margin-top="0pt" fo:margin-bottom="0pt" fo:border="none"/>
      <style:text-properties fo:font-family="Arial" style:font-family-asian="Arial" style:font-family-complex="Arial" fo:font-size="12pt"/>
    </style:style>
    <style:style style:family="text" style:name="T991">
      <style:text-properties fo:color="#1f1f1f" fo:font-family="Arial" style:font-family-asian="Arial" style:font-family-complex="Arial" fo:font-size="12pt"/>
    </style:style>
    <style:style style:parent-style-name="912" style:list-style-name="WWNum18" style:family="paragraph" style:name="P360">
      <style:paragraph-properties fo:line-height="115%" fo:margin-right="0cm" fo:margin-top="0pt" fo:margin-bottom="0pt" fo:border="none"/>
      <style:text-properties fo:font-family="Arial" style:font-family-asian="Arial" style:font-family-complex="Arial" fo:font-size="12pt"/>
    </style:style>
    <style:style style:family="text" style:name="T992">
      <style:text-properties fo:color="#1f1f1f" fo:font-family="Arial" style:font-family-asian="Arial" style:font-family-complex="Arial" fo:font-size="12pt"/>
    </style:style>
    <style:style style:parent-style-name="912" style:list-style-name="WWNum18" style:family="paragraph" style:name="P361">
      <style:paragraph-properties fo:line-height="115%" fo:margin-right="0cm" fo:margin-top="0pt" fo:margin-bottom="0pt" fo:border="none"/>
      <style:text-properties fo:font-family="Arial" style:font-family-asian="Arial" style:font-family-complex="Arial" fo:font-size="12pt"/>
    </style:style>
    <style:style style:family="text" style:name="T993">
      <style:text-properties fo:color="#1f1f1f" fo:font-family="Arial" style:font-family-asian="Arial" style:font-family-complex="Arial" fo:font-size="12pt"/>
    </style:style>
    <style:style style:family="paragraph" style:name="P362">
      <style:paragraph-properties/>
      <style:text-properties/>
    </style:style>
    <style:style style:parent-style-name="851" style:family="paragraph" style:name="P36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94">
      <style:text-properties fo:color="#1f1f1f" fo:font-family="Arial" style:font-family-asian="Arial" style:font-family-complex="Arial" fo:font-size="14pt" fo:font-weight="bold"/>
    </style:style>
    <style:style style:family="paragraph" style:name="P36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95">
      <style:text-properties fo:color="#1f1f1f" fo:font-family="Arial" style:font-family-asian="Arial" style:font-family-complex="Arial" fo:font-size="12pt"/>
    </style:style>
    <style:style style:parent-style-name="852" style:family="paragraph" style:name="P36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96">
      <style:text-properties fo:color="#1f1f1f" fo:font-family="Arial" style:font-family-asian="Arial" style:font-family-complex="Arial" fo:font-size="12pt" fo:font-weight="bold"/>
    </style:style>
    <style:style style:family="paragraph" style:name="P36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97">
      <style:text-properties fo:color="#1f1f1f" fo:font-family="Arial" style:font-family-asian="Arial" style:font-family-complex="Arial" fo:font-size="12pt"/>
    </style:style>
    <style:style style:parent-style-name="852" style:family="paragraph" style:name="P36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998">
      <style:text-properties fo:color="#1f1f1f" fo:font-family="Arial" style:font-family-asian="Arial" style:font-family-complex="Arial" fo:font-size="12pt" fo:font-weight="bold"/>
    </style:style>
    <style:style style:family="paragraph" style:name="P36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999">
      <style:text-properties fo:color="#1f1f1f" fo:font-family="Arial" style:font-family-asian="Arial" style:font-family-complex="Arial" fo:font-size="12pt"/>
    </style:style>
    <style:style style:parent-style-name="852" style:family="paragraph" style:name="P36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00">
      <style:text-properties fo:color="#1f1f1f" fo:font-family="Arial" style:font-family-asian="Arial" style:font-family-complex="Arial" fo:font-size="12pt" fo:font-weight="bold"/>
    </style:style>
    <style:style style:family="paragraph" style:name="P37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01">
      <style:text-properties fo:color="#1f1f1f" fo:font-family="Arial" style:font-family-asian="Arial" style:font-family-complex="Arial" fo:font-size="12pt"/>
    </style:style>
    <style:style style:parent-style-name="852" style:family="paragraph" style:name="P37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02">
      <style:text-properties fo:color="#1f1f1f" fo:font-family="Arial" style:font-family-asian="Arial" style:font-family-complex="Arial" fo:font-size="12pt" fo:font-weight="bold"/>
    </style:style>
    <style:style style:family="paragraph" style:name="P37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03">
      <style:text-properties fo:color="#1f1f1f" fo:font-family="Arial" style:font-family-asian="Arial" style:font-family-complex="Arial" fo:font-size="12pt"/>
    </style:style>
    <style:style style:parent-style-name="851" style:family="paragraph" style:name="P37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04">
      <style:text-properties fo:color="#1f1f1f" fo:font-family="Arial" style:font-family-asian="Arial" style:font-family-complex="Arial" fo:font-size="14pt" fo:font-weight="bold"/>
    </style:style>
    <style:style style:parent-style-name="912" style:list-style-name="WWNum19" style:family="paragraph" style:name="P374">
      <style:paragraph-properties fo:line-height="115%" fo:margin-right="0cm" fo:margin-top="0pt" fo:margin-bottom="0pt" fo:border="none"/>
      <style:text-properties fo:font-family="Arial" style:font-family-asian="Arial" style:font-family-complex="Arial" fo:font-size="12pt"/>
    </style:style>
    <style:style style:family="text" style:name="T1005">
      <style:text-properties fo:color="#1f1f1f" fo:font-family="Arial" style:font-family-asian="Arial" style:font-family-complex="Arial" fo:font-size="12pt"/>
    </style:style>
    <style:style style:parent-style-name="912" style:list-style-name="WWNum19" style:family="paragraph" style:name="P375">
      <style:paragraph-properties fo:line-height="115%" fo:margin-right="0cm" fo:margin-top="0pt" fo:margin-bottom="0pt" fo:border="none"/>
      <style:text-properties fo:font-family="Arial" style:font-family-asian="Arial" style:font-family-complex="Arial" fo:font-size="12pt"/>
    </style:style>
    <style:style style:family="text" style:name="T1006">
      <style:text-properties fo:color="#1f1f1f" fo:font-family="Arial" style:font-family-asian="Arial" style:font-family-complex="Arial" fo:font-size="12pt"/>
    </style:style>
    <style:style style:parent-style-name="912" style:list-style-name="WWNum19" style:family="paragraph" style:name="P376">
      <style:paragraph-properties fo:line-height="115%" fo:margin-right="0cm" fo:margin-top="0pt" fo:margin-bottom="0pt" fo:border="none"/>
      <style:text-properties fo:font-family="Arial" style:font-family-asian="Arial" style:font-family-complex="Arial" fo:font-size="12pt"/>
    </style:style>
    <style:style style:family="text" style:name="T1007">
      <style:text-properties fo:color="#1f1f1f" fo:font-family="Arial" style:font-family-asian="Arial" style:font-family-complex="Arial" fo:font-size="12pt"/>
    </style:style>
    <style:style style:parent-style-name="912" style:list-style-name="WWNum19" style:family="paragraph" style:name="P377">
      <style:paragraph-properties fo:line-height="115%" fo:margin-right="0cm" fo:margin-top="0pt" fo:margin-bottom="0pt" fo:border="none"/>
      <style:text-properties fo:font-family="Arial" style:font-family-asian="Arial" style:font-family-complex="Arial" fo:font-size="12pt"/>
    </style:style>
    <style:style style:family="text" style:name="T1008">
      <style:text-properties fo:color="#1f1f1f" fo:font-family="Arial" style:font-family-asian="Arial" style:font-family-complex="Arial" fo:font-size="12pt"/>
    </style:style>
    <style:style style:family="paragraph" style:name="P378">
      <style:paragraph-properties/>
      <style:text-properties/>
    </style:style>
    <style:style style:family="paragraph" style:name="P379">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009">
      <style:text-properties fo:color="#1f1f1f" fo:font-family="Arial" style:font-family-asian="Arial" style:font-family-complex="Arial" fo:font-size="12pt"/>
    </style:style>
    <style:style style:parent-style-name="851" style:family="paragraph" style:name="P38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10">
      <style:text-properties fo:color="#1f1f1f" fo:font-family="Arial" style:font-family-asian="Arial" style:font-family-complex="Arial" fo:font-size="14pt" fo:font-weight="bold"/>
    </style:style>
    <style:style style:family="paragraph" style:name="P38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11">
      <style:text-properties fo:color="#1f1f1f" fo:font-family="Arial" style:font-family-asian="Arial" style:font-family-complex="Arial" fo:font-size="12pt"/>
    </style:style>
    <style:style style:parent-style-name="852" style:family="paragraph" style:name="P38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12">
      <style:text-properties fo:color="#1f1f1f" fo:font-family="Arial" style:font-family-asian="Arial" style:font-family-complex="Arial" fo:font-size="12pt" fo:font-weight="bold"/>
    </style:style>
    <style:style style:family="paragraph" style:name="P38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13">
      <style:text-properties fo:color="#1f1f1f" fo:font-family="Arial" style:font-family-asian="Arial" style:font-family-complex="Arial" fo:font-size="12pt"/>
    </style:style>
    <style:style style:parent-style-name="852" style:family="paragraph" style:name="P38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14">
      <style:text-properties fo:color="#1f1f1f" fo:font-family="Arial" style:font-family-asian="Arial" style:font-family-complex="Arial" fo:font-size="12pt" fo:font-weight="bold"/>
    </style:style>
    <style:style style:family="paragraph" style:name="P38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15">
      <style:text-properties fo:color="#1f1f1f" fo:font-family="Arial" style:font-family-asian="Arial" style:font-family-complex="Arial" fo:font-size="12pt"/>
    </style:style>
    <style:style style:parent-style-name="852" style:family="paragraph" style:name="P38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16">
      <style:text-properties fo:color="#1f1f1f" fo:font-family="Arial" style:font-family-asian="Arial" style:font-family-complex="Arial" fo:font-size="12pt" fo:font-weight="bold"/>
    </style:style>
    <style:style style:family="paragraph" style:name="P38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17">
      <style:text-properties fo:color="#1f1f1f" fo:font-family="Arial" style:font-family-asian="Arial" style:font-family-complex="Arial" fo:font-size="12pt"/>
    </style:style>
    <style:style style:parent-style-name="852" style:family="paragraph" style:name="P38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18">
      <style:text-properties fo:color="#1f1f1f" fo:font-family="Arial" style:font-family-asian="Arial" style:font-family-complex="Arial" fo:font-size="12pt" fo:font-weight="bold"/>
    </style:style>
    <style:style style:family="paragraph" style:name="P38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19">
      <style:text-properties fo:color="#1f1f1f" fo:font-family="Arial" style:font-family-asian="Arial" style:font-family-complex="Arial" fo:font-size="12pt"/>
    </style:style>
    <style:style style:parent-style-name="851" style:family="paragraph" style:name="P39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20">
      <style:text-properties fo:color="#1f1f1f" fo:font-family="Arial" style:font-family-asian="Arial" style:font-family-complex="Arial" fo:font-size="14pt" fo:font-weight="bold"/>
    </style:style>
    <style:style style:parent-style-name="912" style:list-style-name="WWNum20" style:family="paragraph" style:name="P391">
      <style:paragraph-properties fo:line-height="115%" fo:margin-right="0cm" fo:margin-top="0pt" fo:margin-bottom="0pt" fo:border="none"/>
      <style:text-properties fo:font-family="Arial" style:font-family-asian="Arial" style:font-family-complex="Arial" fo:font-size="12pt"/>
    </style:style>
    <style:style style:family="text" style:name="T1021">
      <style:text-properties fo:color="#1f1f1f" fo:font-family="Arial" style:font-family-asian="Arial" style:font-family-complex="Arial" fo:font-size="12pt"/>
    </style:style>
    <style:style style:parent-style-name="912" style:list-style-name="WWNum20" style:family="paragraph" style:name="P392">
      <style:paragraph-properties fo:line-height="115%" fo:margin-right="0cm" fo:margin-top="0pt" fo:margin-bottom="0pt" fo:border="none"/>
      <style:text-properties fo:font-family="Arial" style:font-family-asian="Arial" style:font-family-complex="Arial" fo:font-size="12pt"/>
    </style:style>
    <style:style style:family="text" style:name="T1022">
      <style:text-properties fo:color="#1f1f1f" fo:font-family="Arial" style:font-family-asian="Arial" style:font-family-complex="Arial" fo:font-size="12pt"/>
    </style:style>
    <style:style style:parent-style-name="912" style:list-style-name="WWNum20" style:family="paragraph" style:name="P393">
      <style:paragraph-properties fo:line-height="115%" fo:margin-right="0cm" fo:margin-top="0pt" fo:margin-bottom="0pt" fo:border="none"/>
      <style:text-properties fo:font-family="Arial" style:font-family-asian="Arial" style:font-family-complex="Arial" fo:font-size="12pt"/>
    </style:style>
    <style:style style:family="text" style:name="T1023">
      <style:text-properties fo:color="#1f1f1f" fo:font-family="Arial" style:font-family-asian="Arial" style:font-family-complex="Arial" fo:font-size="12pt"/>
    </style:style>
    <style:style style:parent-style-name="912" style:list-style-name="WWNum20" style:family="paragraph" style:name="P394">
      <style:paragraph-properties fo:line-height="115%" fo:margin-right="0cm" fo:margin-top="0pt" fo:margin-bottom="0pt" fo:border="none"/>
      <style:text-properties fo:font-family="Arial" style:font-family-asian="Arial" style:font-family-complex="Arial" fo:font-size="12pt"/>
    </style:style>
    <style:style style:family="text" style:name="T1024">
      <style:text-properties fo:color="#1f1f1f" fo:font-family="Arial" style:font-family-asian="Arial" style:font-family-complex="Arial" fo:font-size="12pt"/>
    </style:style>
    <style:style style:family="paragraph" style:name="P395">
      <style:paragraph-properties/>
      <style:text-properties/>
    </style:style>
    <style:style style:parent-style-name="851" style:family="paragraph" style:name="P39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25">
      <style:text-properties fo:color="#1f1f1f" fo:font-family="Arial" style:font-family-asian="Arial" style:font-family-complex="Arial" fo:font-size="14pt" fo:font-weight="bold"/>
    </style:style>
    <style:style style:family="paragraph" style:name="P39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26">
      <style:text-properties fo:color="#1f1f1f" fo:font-family="Arial" style:font-family-asian="Arial" style:font-family-complex="Arial" fo:font-size="12pt"/>
    </style:style>
    <style:style style:parent-style-name="852" style:family="paragraph" style:name="P39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27">
      <style:text-properties fo:color="#1f1f1f" fo:font-family="Arial" style:font-family-asian="Arial" style:font-family-complex="Arial" fo:font-size="12pt" fo:font-weight="bold"/>
    </style:style>
    <style:style style:family="paragraph" style:name="P39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28">
      <style:text-properties fo:color="#1f1f1f" fo:font-family="Arial" style:font-family-asian="Arial" style:font-family-complex="Arial" fo:font-size="12pt"/>
    </style:style>
    <style:style style:family="text" style:name="T1029">
      <style:text-properties fo:color="#1f1f1f" fo:font-family="Arial" style:font-family-asian="Arial" style:font-family-complex="Arial" fo:font-size="12pt"/>
    </style:style>
    <style:style style:parent-style-name="852" style:family="paragraph" style:name="P40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30">
      <style:text-properties fo:color="#1f1f1f" fo:font-family="Arial" style:font-family-asian="Arial" style:font-family-complex="Arial" fo:font-size="12pt" fo:font-weight="bold"/>
    </style:style>
    <style:style style:family="paragraph" style:name="P40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31">
      <style:text-properties fo:color="#1f1f1f" fo:font-family="Arial" style:font-family-asian="Arial" style:font-family-complex="Arial" fo:font-size="12pt"/>
    </style:style>
    <style:style style:family="text" style:name="T1032">
      <style:text-properties fo:color="#1f1f1f" fo:font-family="Arial" style:font-family-asian="Arial" style:font-family-complex="Arial" fo:font-size="12pt"/>
    </style:style>
    <style:style style:parent-style-name="852" style:family="paragraph" style:name="P40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33">
      <style:text-properties fo:color="#1f1f1f" fo:font-family="Arial" style:font-family-asian="Arial" style:font-family-complex="Arial" fo:font-size="12pt" fo:font-weight="bold"/>
    </style:style>
    <style:style style:family="paragraph" style:name="P40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34">
      <style:text-properties fo:color="#1f1f1f" fo:font-family="Arial" style:font-family-asian="Arial" style:font-family-complex="Arial" fo:font-size="12pt"/>
    </style:style>
    <style:style style:family="text" style:name="T1035">
      <style:text-properties fo:color="#1f1f1f" fo:font-family="Arial" style:font-family-asian="Arial" style:font-family-complex="Arial" fo:font-size="12pt"/>
    </style:style>
    <style:style style:parent-style-name="852" style:family="paragraph" style:name="P40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36">
      <style:text-properties fo:color="#1f1f1f" fo:font-family="Arial" style:font-family-asian="Arial" style:font-family-complex="Arial" fo:font-size="12pt" fo:font-weight="bold"/>
    </style:style>
    <style:style style:family="paragraph" style:name="P40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37">
      <style:text-properties fo:color="#1f1f1f" fo:font-family="Arial" style:font-family-asian="Arial" style:font-family-complex="Arial" fo:font-size="12pt"/>
    </style:style>
    <style:style style:parent-style-name="851" style:family="paragraph" style:name="P40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38">
      <style:text-properties fo:color="#1f1f1f" fo:font-family="Arial" style:font-family-asian="Arial" style:font-family-complex="Arial" fo:font-size="14pt" fo:font-weight="bold"/>
    </style:style>
    <style:style style:parent-style-name="912" style:list-style-name="WWNum21" style:family="paragraph" style:name="P407">
      <style:paragraph-properties fo:line-height="115%" fo:margin-right="0cm" fo:margin-top="0pt" fo:margin-bottom="0pt" fo:border="none"/>
      <style:text-properties fo:font-family="Arial" style:font-family-asian="Arial" style:font-family-complex="Arial" fo:font-size="12pt"/>
    </style:style>
    <style:style style:family="text" style:name="T1039">
      <style:text-properties fo:color="#1f1f1f" fo:font-family="Arial" style:font-family-asian="Arial" style:font-family-complex="Arial" fo:font-size="12pt"/>
    </style:style>
    <style:style style:parent-style-name="912" style:list-style-name="WWNum21" style:family="paragraph" style:name="P408">
      <style:paragraph-properties fo:line-height="115%" fo:margin-right="0cm" fo:margin-top="0pt" fo:margin-bottom="0pt" fo:border="none"/>
      <style:text-properties fo:font-family="Arial" style:font-family-asian="Arial" style:font-family-complex="Arial" fo:font-size="12pt"/>
    </style:style>
    <style:style style:family="text" style:name="T1040">
      <style:text-properties fo:color="#1f1f1f" fo:font-family="Arial" style:font-family-asian="Arial" style:font-family-complex="Arial" fo:font-size="12pt"/>
    </style:style>
    <style:style style:parent-style-name="912" style:list-style-name="WWNum21" style:family="paragraph" style:name="P409">
      <style:paragraph-properties fo:line-height="115%" fo:margin-right="0cm" fo:margin-top="0pt" fo:margin-bottom="0pt" fo:border="none"/>
      <style:text-properties fo:font-family="Arial" style:font-family-asian="Arial" style:font-family-complex="Arial" fo:font-size="12pt"/>
    </style:style>
    <style:style style:family="text" style:name="T1041">
      <style:text-properties fo:color="#1f1f1f" fo:font-family="Arial" style:font-family-asian="Arial" style:font-family-complex="Arial" fo:font-size="12pt"/>
    </style:style>
    <style:style style:parent-style-name="912" style:list-style-name="WWNum21" style:family="paragraph" style:name="P410">
      <style:paragraph-properties fo:line-height="115%" fo:margin-right="0cm" fo:margin-top="0pt" fo:margin-bottom="0pt" fo:border="none"/>
      <style:text-properties fo:font-family="Arial" style:font-family-asian="Arial" style:font-family-complex="Arial" fo:font-size="12pt"/>
    </style:style>
    <style:style style:family="text" style:name="T1042">
      <style:text-properties fo:color="#1f1f1f" fo:font-family="Arial" style:font-family-asian="Arial" style:font-family-complex="Arial" fo:font-size="12pt"/>
    </style:style>
    <style:style style:family="paragraph" style:name="P411">
      <style:paragraph-properties/>
      <style:text-properties/>
    </style:style>
    <style:style style:family="paragraph" style:name="P412">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043">
      <style:text-properties fo:color="#1f1f1f" fo:font-family="Arial" style:font-family-asian="Arial" style:font-family-complex="Arial" fo:font-size="12pt"/>
    </style:style>
    <style:style style:parent-style-name="851" style:family="paragraph" style:name="P41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44">
      <style:text-properties fo:color="#1f1f1f" fo:font-family="Arial" style:font-family-asian="Arial" style:font-family-complex="Arial" fo:font-size="14pt" fo:font-weight="bold"/>
    </style:style>
    <style:style style:family="paragraph" style:name="P41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45">
      <style:text-properties fo:color="#1f1f1f" fo:font-family="Arial" style:font-family-asian="Arial" style:font-family-complex="Arial" fo:font-size="12pt"/>
    </style:style>
    <style:style style:parent-style-name="852" style:family="paragraph" style:name="P41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46">
      <style:text-properties fo:color="#1f1f1f" fo:font-family="Arial" style:font-family-asian="Arial" style:font-family-complex="Arial" fo:font-size="12pt" fo:font-weight="bold"/>
    </style:style>
    <style:style style:family="paragraph" style:name="P41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47">
      <style:text-properties fo:color="#1f1f1f" fo:font-family="Arial" style:font-family-asian="Arial" style:font-family-complex="Arial" fo:font-size="12pt"/>
    </style:style>
    <style:style style:parent-style-name="852" style:family="paragraph" style:name="P41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48">
      <style:text-properties fo:color="#1f1f1f" fo:font-family="Arial" style:font-family-asian="Arial" style:font-family-complex="Arial" fo:font-size="12pt" fo:font-weight="bold"/>
    </style:style>
    <style:style style:family="paragraph" style:name="P41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49">
      <style:text-properties fo:color="#1f1f1f" fo:font-family="Arial" style:font-family-asian="Arial" style:font-family-complex="Arial" fo:font-size="12pt"/>
    </style:style>
    <style:style style:parent-style-name="852" style:family="paragraph" style:name="P41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50">
      <style:text-properties fo:color="#1f1f1f" fo:font-family="Arial" style:font-family-asian="Arial" style:font-family-complex="Arial" fo:font-size="12pt" fo:font-weight="bold"/>
    </style:style>
    <style:style style:family="paragraph" style:name="P42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51">
      <style:text-properties fo:color="#1f1f1f" fo:font-family="Arial" style:font-family-asian="Arial" style:font-family-complex="Arial" fo:font-size="12pt"/>
    </style:style>
    <style:style style:family="paragraph" style:name="P421">
      <style:paragraph-properties fo:line-height="115%" fo:margin-left="0cm" fo:margin-right="0cm" fo:text-indent="0cm" fo:margin-top="0pt" fo:margin-bottom="0pt" fo:background-color="#000000" fo:border="none"/>
      <style:text-properties fo:font-family="Arial" style:font-family-asian="Arial" style:font-family-complex="Arial" fo:font-size="12pt"/>
    </style:style>
    <style:style style:family="text" style:name="T1052">
      <style:text-properties fo:color="#ffffff" fo:font-family="Arial" style:font-family-asian="Arial" style:font-family-complex="Arial" fo:font-size="10.5pt"/>
    </style:style>
    <style:style style:family="paragraph" style:name="P422">
      <style:paragraph-properties fo:line-height="115%" fo:margin-left="0cm" fo:margin-right="0cm" fo:text-indent="0cm" fo:margin-top="0pt" fo:margin-bottom="0pt" fo:background-color="#000000" fo:border="none"/>
      <style:text-properties fo:font-family="Arial" style:font-family-asian="Arial" style:font-family-complex="Arial" fo:font-size="12pt"/>
    </style:style>
    <style:style style:family="text" style:name="T1053">
      <style:text-properties fo:color="#ffffff" fo:font-family="Arial" style:font-family-asian="Arial" style:font-family-complex="Arial" fo:font-size="10.5pt"/>
    </style:style>
    <style:style style:family="paragraph" style:name="P423">
      <style:paragraph-properties fo:line-height="115%" fo:margin-left="0cm" fo:margin-right="0cm" fo:text-indent="0cm" fo:margin-top="0pt" fo:margin-bottom="0pt" fo:background-color="#000000" fo:border="none"/>
      <style:text-properties fo:font-family="Arial" style:font-family-asian="Arial" style:font-family-complex="Arial" fo:font-size="12pt"/>
    </style:style>
    <style:style style:family="text" style:name="T1054">
      <style:text-properties fo:color="#ffffff" fo:font-family="Arial" style:font-family-asian="Arial" style:font-family-complex="Arial" fo:font-size="10.5pt"/>
    </style:style>
    <style:style style:family="paragraph" style:name="P424">
      <style:paragraph-properties fo:line-height="115%" fo:margin-left="0cm" fo:margin-right="0cm" fo:text-indent="0cm" fo:margin-top="0pt" fo:margin-bottom="0pt" fo:background-color="#000000" fo:border="none"/>
      <style:text-properties fo:font-family="Arial" style:font-family-asian="Arial" style:font-family-complex="Arial" fo:font-size="12pt"/>
    </style:style>
    <style:style style:family="text" style:name="T1055">
      <style:text-properties fo:color="#ffffff" fo:font-family="Arial" style:font-family-asian="Arial" style:font-family-complex="Arial" fo:font-size="10.5pt"/>
    </style:style>
    <style:style style:family="paragraph" style:name="P425">
      <style:paragraph-properties fo:line-height="115%" fo:margin-left="0cm" fo:margin-right="0cm" fo:text-indent="0cm" fo:margin-top="0pt" fo:margin-bottom="0pt" fo:background-color="#000000" fo:border="none"/>
      <style:text-properties fo:font-family="Arial" style:font-family-asian="Arial" style:font-family-complex="Arial" fo:font-size="12pt"/>
    </style:style>
    <style:style style:family="text" style:name="T1056">
      <style:text-properties fo:font-family="Arial" style:font-family-asian="Arial" style:font-family-complex="Arial" fo:font-size="12pt"/>
    </style:style>
    <style:style style:parent-style-name="852" style:family="paragraph" style:name="P42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57">
      <style:text-properties fo:color="#1f1f1f" fo:font-family="Arial" style:font-family-asian="Arial" style:font-family-complex="Arial" fo:font-size="12pt" fo:font-weight="bold"/>
    </style:style>
    <style:style style:family="paragraph" style:name="P42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58">
      <style:text-properties fo:color="#1f1f1f" fo:font-family="Arial" style:font-family-asian="Arial" style:font-family-complex="Arial" fo:font-size="12pt"/>
    </style:style>
    <style:style style:parent-style-name="851" style:family="paragraph" style:name="P42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59">
      <style:text-properties fo:color="#1f1f1f" fo:font-family="Arial" style:font-family-asian="Arial" style:font-family-complex="Arial" fo:font-size="14pt" fo:font-weight="bold"/>
    </style:style>
    <style:style style:parent-style-name="912" style:list-style-name="WWNum22" style:family="paragraph" style:name="P429">
      <style:paragraph-properties fo:line-height="115%" fo:margin-right="0cm" fo:margin-top="0pt" fo:margin-bottom="0pt" fo:border="none"/>
      <style:text-properties fo:font-family="Arial" style:font-family-asian="Arial" style:font-family-complex="Arial" fo:font-size="12pt"/>
    </style:style>
    <style:style style:family="text" style:name="T1060">
      <style:text-properties fo:color="#1f1f1f" fo:font-family="Arial" style:font-family-asian="Arial" style:font-family-complex="Arial" fo:font-size="12pt"/>
    </style:style>
    <style:style style:parent-style-name="912" style:list-style-name="WWNum22" style:family="paragraph" style:name="P430">
      <style:paragraph-properties fo:line-height="115%" fo:margin-right="0cm" fo:margin-top="0pt" fo:margin-bottom="0pt" fo:border="none"/>
      <style:text-properties fo:font-family="Arial" style:font-family-asian="Arial" style:font-family-complex="Arial" fo:font-size="12pt"/>
    </style:style>
    <style:style style:family="text" style:name="T1061">
      <style:text-properties fo:color="#1f1f1f" fo:font-family="Arial" style:font-family-asian="Arial" style:font-family-complex="Arial" fo:font-size="12pt"/>
    </style:style>
    <style:style style:parent-style-name="912" style:list-style-name="WWNum22" style:family="paragraph" style:name="P431">
      <style:paragraph-properties fo:line-height="115%" fo:margin-right="0cm" fo:margin-top="0pt" fo:margin-bottom="0pt" fo:border="none"/>
      <style:text-properties fo:font-family="Arial" style:font-family-asian="Arial" style:font-family-complex="Arial" fo:font-size="12pt"/>
    </style:style>
    <style:style style:family="text" style:name="T1062">
      <style:text-properties fo:color="#1f1f1f" fo:font-family="Arial" style:font-family-asian="Arial" style:font-family-complex="Arial" fo:font-size="12pt"/>
    </style:style>
    <style:style style:parent-style-name="912" style:list-style-name="WWNum22" style:family="paragraph" style:name="P432">
      <style:paragraph-properties fo:line-height="115%" fo:margin-right="0cm" fo:margin-top="0pt" fo:margin-bottom="0pt" fo:border="none"/>
      <style:text-properties fo:font-family="Arial" style:font-family-asian="Arial" style:font-family-complex="Arial" fo:font-size="12pt"/>
    </style:style>
    <style:style style:family="text" style:name="T1063">
      <style:text-properties fo:color="#1f1f1f" fo:font-family="Arial" style:font-family-asian="Arial" style:font-family-complex="Arial" fo:font-size="12pt"/>
    </style:style>
    <style:style style:family="paragraph" style:name="P433">
      <style:paragraph-properties/>
      <style:text-properties/>
    </style:style>
    <style:style style:family="paragraph" style:name="P434">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064">
      <style:text-properties fo:color="#1f1f1f" fo:font-family="Arial" style:font-family-asian="Arial" style:font-family-complex="Arial" fo:font-size="12pt"/>
    </style:style>
    <style:style style:parent-style-name="851" style:family="paragraph" style:name="P43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65">
      <style:text-properties fo:color="#1f1f1f" fo:font-family="Arial" style:font-family-asian="Arial" style:font-family-complex="Arial" fo:font-size="14pt" fo:font-weight="bold"/>
    </style:style>
    <style:style style:family="paragraph" style:name="P4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66">
      <style:text-properties fo:color="#1f1f1f" fo:font-family="Arial" style:font-family-asian="Arial" style:font-family-complex="Arial" fo:font-size="12pt"/>
    </style:style>
    <style:style style:parent-style-name="852" style:family="paragraph" style:name="P43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67">
      <style:text-properties fo:color="#1f1f1f" fo:font-family="Arial" style:font-family-asian="Arial" style:font-family-complex="Arial" fo:font-size="12pt" fo:font-weight="bold"/>
    </style:style>
    <style:style style:family="paragraph" style:name="P43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68">
      <style:text-properties fo:color="#1f1f1f" fo:font-family="Arial" style:font-family-asian="Arial" style:font-family-complex="Arial" fo:font-size="12pt"/>
    </style:style>
    <style:style style:parent-style-name="852" style:family="paragraph" style:name="P4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69">
      <style:text-properties fo:color="#1f1f1f" fo:font-family="Arial" style:font-family-asian="Arial" style:font-family-complex="Arial" fo:font-size="12pt" fo:font-weight="bold"/>
    </style:style>
    <style:style style:family="paragraph" style:name="P4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70">
      <style:text-properties fo:color="#1f1f1f" fo:font-family="Arial" style:font-family-asian="Arial" style:font-family-complex="Arial" fo:font-size="12pt"/>
    </style:style>
    <style:style style:parent-style-name="852" style:family="paragraph" style:name="P44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71">
      <style:text-properties fo:color="#1f1f1f" fo:font-family="Arial" style:font-family-asian="Arial" style:font-family-complex="Arial" fo:font-size="12pt" fo:font-weight="bold"/>
    </style:style>
    <style:style style:family="paragraph" style:name="P44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72">
      <style:text-properties fo:color="#1f1f1f" fo:font-family="Arial" style:font-family-asian="Arial" style:font-family-complex="Arial" fo:font-size="12pt"/>
    </style:style>
    <style:style style:parent-style-name="852" style:family="paragraph" style:name="P44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73">
      <style:text-properties fo:color="#1f1f1f" fo:font-family="Arial" style:font-family-asian="Arial" style:font-family-complex="Arial" fo:font-size="12pt" fo:font-weight="bold"/>
    </style:style>
    <style:style style:family="paragraph" style:name="P44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74">
      <style:text-properties fo:color="#1f1f1f" fo:font-family="Arial" style:font-family-asian="Arial" style:font-family-complex="Arial" fo:font-size="12pt"/>
    </style:style>
    <style:style style:parent-style-name="851" style:family="paragraph" style:name="P44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75">
      <style:text-properties fo:color="#1f1f1f" fo:font-family="Arial" style:font-family-asian="Arial" style:font-family-complex="Arial" fo:font-size="14pt" fo:font-weight="bold"/>
    </style:style>
    <style:style style:parent-style-name="912" style:list-style-name="WWNum23" style:family="paragraph" style:name="P446">
      <style:paragraph-properties fo:line-height="115%" fo:margin-right="0cm" fo:margin-top="0pt" fo:margin-bottom="0pt" fo:border="none"/>
      <style:text-properties fo:font-family="Arial" style:font-family-asian="Arial" style:font-family-complex="Arial" fo:font-size="12pt"/>
    </style:style>
    <style:style style:family="text" style:name="T1076">
      <style:text-properties fo:color="#1f1f1f" fo:font-family="Arial" style:font-family-asian="Arial" style:font-family-complex="Arial" fo:font-size="12pt"/>
    </style:style>
    <style:style style:parent-style-name="912" style:list-style-name="WWNum23" style:family="paragraph" style:name="P447">
      <style:paragraph-properties fo:line-height="115%" fo:margin-right="0cm" fo:margin-top="0pt" fo:margin-bottom="0pt" fo:border="none"/>
      <style:text-properties fo:font-family="Arial" style:font-family-asian="Arial" style:font-family-complex="Arial" fo:font-size="12pt"/>
    </style:style>
    <style:style style:family="text" style:name="T1077">
      <style:text-properties fo:color="#1f1f1f" fo:font-family="Arial" style:font-family-asian="Arial" style:font-family-complex="Arial" fo:font-size="12pt"/>
    </style:style>
    <style:style style:parent-style-name="912" style:list-style-name="WWNum23" style:family="paragraph" style:name="P448">
      <style:paragraph-properties fo:line-height="115%" fo:margin-right="0cm" fo:margin-top="0pt" fo:margin-bottom="0pt" fo:border="none"/>
      <style:text-properties fo:font-family="Arial" style:font-family-asian="Arial" style:font-family-complex="Arial" fo:font-size="12pt"/>
    </style:style>
    <style:style style:family="text" style:name="T1078">
      <style:text-properties fo:color="#1f1f1f" fo:font-family="Arial" style:font-family-asian="Arial" style:font-family-complex="Arial" fo:font-size="12pt"/>
    </style:style>
    <style:style style:parent-style-name="912" style:list-style-name="WWNum23" style:family="paragraph" style:name="P449">
      <style:paragraph-properties fo:line-height="115%" fo:margin-right="0cm" fo:margin-top="0pt" fo:margin-bottom="0pt" fo:border="none"/>
      <style:text-properties fo:font-family="Arial" style:font-family-asian="Arial" style:font-family-complex="Arial" fo:font-size="12pt"/>
    </style:style>
    <style:style style:family="text" style:name="T1079">
      <style:text-properties fo:color="#1f1f1f" fo:font-family="Arial" style:font-family-asian="Arial" style:font-family-complex="Arial" fo:font-size="12pt"/>
    </style:style>
    <style:style style:family="paragraph" style:name="P450">
      <style:paragraph-properties/>
      <style:text-properties/>
    </style:style>
    <style:style style:parent-style-name="851" style:family="paragraph" style:name="P45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80">
      <style:text-properties fo:color="#1f1f1f" fo:font-family="Arial" style:font-family-asian="Arial" style:font-family-complex="Arial" fo:font-size="14pt" fo:font-weight="bold"/>
    </style:style>
    <style:style style:family="paragraph" style:name="P45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81">
      <style:text-properties fo:color="#1f1f1f" fo:font-family="Arial" style:font-family-asian="Arial" style:font-family-complex="Arial" fo:font-size="12pt"/>
    </style:style>
    <style:style style:parent-style-name="852" style:family="paragraph" style:name="P45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82">
      <style:text-properties fo:color="#1f1f1f" fo:font-family="Arial" style:font-family-asian="Arial" style:font-family-complex="Arial" fo:font-size="12pt" fo:font-weight="bold"/>
    </style:style>
    <style:style style:family="paragraph" style:name="P45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83">
      <style:text-properties fo:color="#1f1f1f" fo:font-family="Arial" style:font-family-asian="Arial" style:font-family-complex="Arial" fo:font-size="12pt"/>
    </style:style>
    <style:style style:parent-style-name="852" style:family="paragraph" style:name="P45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84">
      <style:text-properties fo:color="#1f1f1f" fo:font-family="Arial" style:font-family-asian="Arial" style:font-family-complex="Arial" fo:font-size="12pt" fo:font-weight="bold"/>
    </style:style>
    <style:style style:family="paragraph" style:name="P45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85">
      <style:text-properties fo:color="#1f1f1f" fo:font-family="Arial" style:font-family-asian="Arial" style:font-family-complex="Arial" fo:font-size="12pt"/>
    </style:style>
    <style:style style:family="text" style:name="T1086">
      <style:text-properties fo:color="#1f1f1f" fo:font-family="Arial" style:font-family-asian="Arial" style:font-family-complex="Arial" fo:font-size="12pt"/>
    </style:style>
    <style:style style:parent-style-name="852" style:family="paragraph" style:name="P45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87">
      <style:text-properties fo:color="#1f1f1f" fo:font-family="Arial" style:font-family-asian="Arial" style:font-family-complex="Arial" fo:font-size="12pt" fo:font-weight="bold"/>
    </style:style>
    <style:style style:family="paragraph" style:name="P45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88">
      <style:text-properties fo:color="#1f1f1f" fo:font-family="Arial" style:font-family-asian="Arial" style:font-family-complex="Arial" fo:font-size="12pt"/>
    </style:style>
    <style:style style:family="text" style:name="T1089">
      <style:text-properties fo:color="#1f1f1f" fo:font-family="Arial" style:font-family-asian="Arial" style:font-family-complex="Arial" fo:font-size="12pt"/>
    </style:style>
    <style:style style:parent-style-name="852" style:family="paragraph" style:name="P45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090">
      <style:text-properties fo:color="#1f1f1f" fo:font-family="Arial" style:font-family-asian="Arial" style:font-family-complex="Arial" fo:font-size="12pt" fo:font-weight="bold"/>
    </style:style>
    <style:style style:family="paragraph" style:name="P46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91">
      <style:text-properties fo:color="#1f1f1f" fo:font-family="Arial" style:font-family-asian="Arial" style:font-family-complex="Arial" fo:font-size="12pt"/>
    </style:style>
    <style:style style:parent-style-name="851" style:family="paragraph" style:name="P46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92">
      <style:text-properties fo:color="#1f1f1f" fo:font-family="Arial" style:font-family-asian="Arial" style:font-family-complex="Arial" fo:font-size="14pt" fo:font-weight="bold"/>
    </style:style>
    <style:style style:parent-style-name="912" style:list-style-name="WWNum24" style:family="paragraph" style:name="P462">
      <style:paragraph-properties fo:line-height="115%" fo:margin-right="0cm" fo:margin-top="0pt" fo:margin-bottom="0pt" fo:border="none"/>
      <style:text-properties fo:font-family="Arial" style:font-family-asian="Arial" style:font-family-complex="Arial" fo:font-size="12pt"/>
    </style:style>
    <style:style style:family="text" style:name="T1093">
      <style:text-properties fo:color="#1f1f1f" fo:font-family="Arial" style:font-family-asian="Arial" style:font-family-complex="Arial" fo:font-size="12pt"/>
    </style:style>
    <style:style style:parent-style-name="912" style:list-style-name="WWNum24" style:family="paragraph" style:name="P463">
      <style:paragraph-properties fo:line-height="115%" fo:margin-right="0cm" fo:margin-top="0pt" fo:margin-bottom="0pt" fo:border="none"/>
      <style:text-properties fo:font-family="Arial" style:font-family-asian="Arial" style:font-family-complex="Arial" fo:font-size="12pt"/>
    </style:style>
    <style:style style:family="text" style:name="T1094">
      <style:text-properties fo:color="#1f1f1f" fo:font-family="Arial" style:font-family-asian="Arial" style:font-family-complex="Arial" fo:font-size="12pt"/>
    </style:style>
    <style:style style:parent-style-name="912" style:list-style-name="WWNum24" style:family="paragraph" style:name="P464">
      <style:paragraph-properties fo:line-height="115%" fo:margin-right="0cm" fo:margin-top="0pt" fo:margin-bottom="0pt" fo:border="none"/>
      <style:text-properties fo:font-family="Arial" style:font-family-asian="Arial" style:font-family-complex="Arial" fo:font-size="12pt"/>
    </style:style>
    <style:style style:family="text" style:name="T1095">
      <style:text-properties fo:color="#1f1f1f" fo:font-family="Arial" style:font-family-asian="Arial" style:font-family-complex="Arial" fo:font-size="12pt"/>
    </style:style>
    <style:style style:parent-style-name="912" style:list-style-name="WWNum24" style:family="paragraph" style:name="P465">
      <style:paragraph-properties fo:line-height="115%" fo:margin-right="0cm" fo:margin-top="0pt" fo:margin-bottom="0pt" fo:border="none"/>
      <style:text-properties fo:font-family="Arial" style:font-family-asian="Arial" style:font-family-complex="Arial" fo:font-size="12pt"/>
    </style:style>
    <style:style style:family="text" style:name="T1096">
      <style:text-properties fo:color="#1f1f1f" fo:font-family="Arial" style:font-family-asian="Arial" style:font-family-complex="Arial" fo:font-size="12pt"/>
    </style:style>
    <style:style style:family="paragraph" style:name="P466">
      <style:paragraph-properties/>
      <style:text-properties/>
    </style:style>
    <style:style style:family="paragraph" style:name="P46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097">
      <style:text-properties fo:color="#1f1f1f" fo:font-family="Arial" style:font-family-asian="Arial" style:font-family-complex="Arial" fo:font-size="12pt"/>
    </style:style>
    <style:style style:parent-style-name="851" style:family="paragraph" style:name="P46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98">
      <style:text-properties fo:color="#1f1f1f" fo:font-family="Arial" style:font-family-asian="Arial" style:font-family-complex="Arial" fo:font-size="14pt" fo:font-weight="bold"/>
    </style:style>
    <style:style style:family="paragraph" style:name="P46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099">
      <style:text-properties fo:color="#1f1f1f" fo:font-family="Arial" style:font-family-asian="Arial" style:font-family-complex="Arial" fo:font-size="12pt"/>
    </style:style>
    <style:style style:parent-style-name="852" style:family="paragraph" style:name="P47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00">
      <style:text-properties fo:color="#1f1f1f" fo:font-family="Arial" style:font-family-asian="Arial" style:font-family-complex="Arial" fo:font-size="12pt" fo:font-weight="bold"/>
    </style:style>
    <style:style style:family="paragraph" style:name="P47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01">
      <style:text-properties fo:color="#1f1f1f" fo:font-family="Arial" style:font-family-asian="Arial" style:font-family-complex="Arial" fo:font-size="12pt"/>
    </style:style>
    <style:style style:parent-style-name="852" style:family="paragraph" style:name="P47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02">
      <style:text-properties fo:color="#1f1f1f" fo:font-family="Arial" style:font-family-asian="Arial" style:font-family-complex="Arial" fo:font-size="12pt" fo:font-weight="bold"/>
    </style:style>
    <style:style style:family="paragraph" style:name="P47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03">
      <style:text-properties fo:color="#1f1f1f" fo:font-family="Arial" style:font-family-asian="Arial" style:font-family-complex="Arial" fo:font-size="12pt"/>
    </style:style>
    <style:style style:parent-style-name="852" style:family="paragraph" style:name="P47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04">
      <style:text-properties fo:color="#1f1f1f" fo:font-family="Arial" style:font-family-asian="Arial" style:font-family-complex="Arial" fo:font-size="12pt" fo:font-weight="bold"/>
    </style:style>
    <style:style style:family="paragraph" style:name="P47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05">
      <style:text-properties fo:color="#1f1f1f" fo:font-family="Arial" style:font-family-asian="Arial" style:font-family-complex="Arial" fo:font-size="12pt"/>
    </style:style>
    <style:style style:parent-style-name="852" style:family="paragraph" style:name="P47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06">
      <style:text-properties fo:color="#1f1f1f" fo:font-family="Arial" style:font-family-asian="Arial" style:font-family-complex="Arial" fo:font-size="12pt" fo:font-weight="bold"/>
    </style:style>
    <style:style style:family="paragraph" style:name="P47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07">
      <style:text-properties fo:color="#1f1f1f" fo:font-family="Arial" style:font-family-asian="Arial" style:font-family-complex="Arial" fo:font-size="12pt"/>
    </style:style>
    <style:style style:parent-style-name="851" style:family="paragraph" style:name="P47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08">
      <style:text-properties fo:color="#1f1f1f" fo:font-family="Arial" style:font-family-asian="Arial" style:font-family-complex="Arial" fo:font-size="14pt" fo:font-weight="bold"/>
    </style:style>
    <style:style style:parent-style-name="912" style:list-style-name="WWNum25" style:family="paragraph" style:name="P479">
      <style:paragraph-properties fo:line-height="115%" fo:margin-right="0cm" fo:margin-top="0pt" fo:margin-bottom="0pt" fo:border="none"/>
      <style:text-properties fo:font-family="Arial" style:font-family-asian="Arial" style:font-family-complex="Arial" fo:font-size="12pt"/>
    </style:style>
    <style:style style:family="text" style:name="T1109">
      <style:text-properties fo:color="#1f1f1f" fo:font-family="Arial" style:font-family-asian="Arial" style:font-family-complex="Arial" fo:font-size="12pt"/>
    </style:style>
    <style:style style:parent-style-name="912" style:list-style-name="WWNum25" style:family="paragraph" style:name="P480">
      <style:paragraph-properties fo:line-height="115%" fo:margin-right="0cm" fo:margin-top="0pt" fo:margin-bottom="0pt" fo:border="none"/>
      <style:text-properties fo:font-family="Arial" style:font-family-asian="Arial" style:font-family-complex="Arial" fo:font-size="12pt"/>
    </style:style>
    <style:style style:family="text" style:name="T1110">
      <style:text-properties fo:color="#1f1f1f" fo:font-family="Arial" style:font-family-asian="Arial" style:font-family-complex="Arial" fo:font-size="12pt"/>
    </style:style>
    <style:style style:parent-style-name="912" style:list-style-name="WWNum25" style:family="paragraph" style:name="P481">
      <style:paragraph-properties fo:line-height="115%" fo:margin-right="0cm" fo:margin-top="0pt" fo:margin-bottom="0pt" fo:border="none"/>
      <style:text-properties fo:font-family="Arial" style:font-family-asian="Arial" style:font-family-complex="Arial" fo:font-size="12pt"/>
    </style:style>
    <style:style style:family="text" style:name="T1111">
      <style:text-properties fo:color="#1f1f1f" fo:font-family="Arial" style:font-family-asian="Arial" style:font-family-complex="Arial" fo:font-size="12pt"/>
    </style:style>
    <style:style style:parent-style-name="912" style:list-style-name="WWNum25" style:family="paragraph" style:name="P482">
      <style:paragraph-properties fo:line-height="115%" fo:margin-right="0cm" fo:margin-top="0pt" fo:margin-bottom="0pt" fo:border="none"/>
      <style:text-properties fo:font-family="Arial" style:font-family-asian="Arial" style:font-family-complex="Arial" fo:font-size="12pt"/>
    </style:style>
    <style:style style:family="text" style:name="T1112">
      <style:text-properties fo:color="#1f1f1f" fo:font-family="Arial" style:font-family-asian="Arial" style:font-family-complex="Arial" fo:font-size="12pt"/>
    </style:style>
    <style:style style:family="paragraph" style:name="P483">
      <style:paragraph-properties/>
      <style:text-properties/>
    </style:style>
    <style:style style:family="paragraph" style:name="P484">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113">
      <style:text-properties fo:color="#1f1f1f" fo:font-family="Arial" style:font-family-asian="Arial" style:font-family-complex="Arial" fo:font-size="12pt"/>
    </style:style>
    <style:style style:parent-style-name="851" style:family="paragraph" style:name="P48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14">
      <style:text-properties fo:color="#1f1f1f" fo:font-family="Arial" style:font-family-asian="Arial" style:font-family-complex="Arial" fo:font-size="14pt" fo:font-weight="bold"/>
    </style:style>
    <style:style style:family="paragraph" style:name="P48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15">
      <style:text-properties fo:color="#1f1f1f" fo:font-family="Arial" style:font-family-asian="Arial" style:font-family-complex="Arial" fo:font-size="12pt"/>
    </style:style>
    <style:style style:parent-style-name="852" style:family="paragraph" style:name="P48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16">
      <style:text-properties fo:color="#1f1f1f" fo:font-family="Arial" style:font-family-asian="Arial" style:font-family-complex="Arial" fo:font-size="12pt" fo:font-weight="bold"/>
    </style:style>
    <style:style style:family="paragraph" style:name="P48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17">
      <style:text-properties fo:color="#1f1f1f" fo:font-family="Arial" style:font-family-asian="Arial" style:font-family-complex="Arial" fo:font-size="12pt"/>
    </style:style>
    <style:style style:parent-style-name="852" style:family="paragraph" style:name="P48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18">
      <style:text-properties fo:color="#1f1f1f" fo:font-family="Arial" style:font-family-asian="Arial" style:font-family-complex="Arial" fo:font-size="12pt" fo:font-weight="bold"/>
    </style:style>
    <style:style style:family="paragraph" style:name="P49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19">
      <style:text-properties fo:color="#1f1f1f" fo:font-family="Arial" style:font-family-asian="Arial" style:font-family-complex="Arial" fo:font-size="12pt"/>
    </style:style>
    <style:style style:parent-style-name="852" style:family="paragraph" style:name="P49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20">
      <style:text-properties fo:color="#1f1f1f" fo:font-family="Arial" style:font-family-asian="Arial" style:font-family-complex="Arial" fo:font-size="12pt" fo:font-weight="bold"/>
    </style:style>
    <style:style style:family="paragraph" style:name="P49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21">
      <style:text-properties fo:color="#1f1f1f" fo:font-family="Arial" style:font-family-asian="Arial" style:font-family-complex="Arial" fo:font-size="12pt"/>
    </style:style>
    <style:style style:parent-style-name="852" style:family="paragraph" style:name="P49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22">
      <style:text-properties fo:color="#1f1f1f" fo:font-family="Arial" style:font-family-asian="Arial" style:font-family-complex="Arial" fo:font-size="12pt" fo:font-weight="bold"/>
    </style:style>
    <style:style style:family="paragraph" style:name="P49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23">
      <style:text-properties fo:color="#1f1f1f" fo:font-family="Arial" style:font-family-asian="Arial" style:font-family-complex="Arial" fo:font-size="12pt"/>
    </style:style>
    <style:style style:parent-style-name="851" style:family="paragraph" style:name="P49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24">
      <style:text-properties fo:color="#1f1f1f" fo:font-family="Arial" style:font-family-asian="Arial" style:font-family-complex="Arial" fo:font-size="14pt" fo:font-weight="bold"/>
    </style:style>
    <style:style style:parent-style-name="912" style:list-style-name="WWNum26" style:family="paragraph" style:name="P496">
      <style:paragraph-properties fo:line-height="115%" fo:margin-right="0cm" fo:margin-top="0pt" fo:margin-bottom="0pt" fo:border="none"/>
      <style:text-properties fo:font-family="Arial" style:font-family-asian="Arial" style:font-family-complex="Arial" fo:font-size="12pt"/>
    </style:style>
    <style:style style:family="text" style:name="T1125">
      <style:text-properties fo:color="#1f1f1f" fo:font-family="Arial" style:font-family-asian="Arial" style:font-family-complex="Arial" fo:font-size="12pt"/>
    </style:style>
    <style:style style:parent-style-name="912" style:list-style-name="WWNum26" style:family="paragraph" style:name="P497">
      <style:paragraph-properties fo:line-height="115%" fo:margin-right="0cm" fo:margin-top="0pt" fo:margin-bottom="0pt" fo:border="none"/>
      <style:text-properties fo:font-family="Arial" style:font-family-asian="Arial" style:font-family-complex="Arial" fo:font-size="12pt"/>
    </style:style>
    <style:style style:family="text" style:name="T1126">
      <style:text-properties fo:color="#1f1f1f" fo:font-family="Arial" style:font-family-asian="Arial" style:font-family-complex="Arial" fo:font-size="12pt"/>
    </style:style>
    <style:style style:parent-style-name="912" style:list-style-name="WWNum26" style:family="paragraph" style:name="P498">
      <style:paragraph-properties fo:line-height="115%" fo:margin-right="0cm" fo:margin-top="0pt" fo:margin-bottom="0pt" fo:border="none"/>
      <style:text-properties fo:font-family="Arial" style:font-family-asian="Arial" style:font-family-complex="Arial" fo:font-size="12pt"/>
    </style:style>
    <style:style style:family="text" style:name="T1127">
      <style:text-properties fo:color="#1f1f1f" fo:font-family="Arial" style:font-family-asian="Arial" style:font-family-complex="Arial" fo:font-size="12pt"/>
    </style:style>
    <style:style style:parent-style-name="912" style:list-style-name="WWNum26" style:family="paragraph" style:name="P499">
      <style:paragraph-properties fo:line-height="115%" fo:margin-right="0cm" fo:margin-top="0pt" fo:margin-bottom="0pt" fo:border="none"/>
      <style:text-properties fo:font-family="Arial" style:font-family-asian="Arial" style:font-family-complex="Arial" fo:font-size="12pt"/>
    </style:style>
    <style:style style:family="text" style:name="T1128">
      <style:text-properties fo:color="#1f1f1f" fo:font-family="Arial" style:font-family-asian="Arial" style:font-family-complex="Arial" fo:font-size="12pt"/>
    </style:style>
    <style:style style:family="paragraph" style:name="P500">
      <style:paragraph-properties/>
      <style:text-properties/>
    </style:style>
    <style:style style:family="paragraph" style:name="P501">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129">
      <style:text-properties fo:color="#1f1f1f" fo:font-family="Arial" style:font-family-asian="Arial" style:font-family-complex="Arial" fo:font-size="12pt"/>
    </style:style>
    <style:style style:parent-style-name="851" style:family="paragraph" style:name="P50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30">
      <style:text-properties fo:color="#1f1f1f" fo:font-family="Arial" style:font-family-asian="Arial" style:font-family-complex="Arial" fo:font-size="14pt" fo:font-weight="bold"/>
    </style:style>
    <style:style style:family="paragraph" style:name="P50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31">
      <style:text-properties fo:color="#1f1f1f" fo:font-family="Arial" style:font-family-asian="Arial" style:font-family-complex="Arial" fo:font-size="12pt"/>
    </style:style>
    <style:style style:family="paragraph" style:name="P50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32">
      <style:text-properties fo:color="#1f1f1f" fo:font-family="Arial" style:font-family-asian="Arial" style:font-family-complex="Arial" fo:font-size="12pt"/>
    </style:style>
    <style:style style:family="paragraph" style:name="P50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33">
      <style:text-properties fo:color="#1f1f1f" fo:font-family="Arial" style:font-family-asian="Arial" style:font-family-complex="Arial" fo:font-size="12pt"/>
    </style:style>
    <style:style style:family="paragraph" style:name="P50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34">
      <style:text-properties fo:color="#1f1f1f" fo:font-family="Arial" style:font-family-asian="Arial" style:font-family-complex="Arial" fo:font-size="12pt"/>
    </style:style>
    <style:style style:family="paragraph" style:name="P50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35">
      <style:text-properties fo:color="#1f1f1f" fo:font-family="Arial" style:font-family-asian="Arial" style:font-family-complex="Arial" fo:font-size="12pt"/>
    </style:style>
    <style:style style:parent-style-name="851" style:family="paragraph" style:name="P50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36">
      <style:text-properties fo:color="#1f1f1f" fo:font-family="Arial" style:font-family-asian="Arial" style:font-family-complex="Arial" fo:font-size="14pt" fo:font-weight="bold"/>
    </style:style>
    <style:style style:parent-style-name="912" style:list-style-name="WWNum27" style:family="paragraph" style:name="P509">
      <style:paragraph-properties fo:line-height="115%" fo:margin-right="0cm" fo:margin-top="0pt" fo:margin-bottom="0pt" fo:border="none"/>
      <style:text-properties fo:font-family="Arial" style:font-family-asian="Arial" style:font-family-complex="Arial" fo:font-size="12pt"/>
    </style:style>
    <style:style style:family="text" style:name="T1137">
      <style:text-properties fo:color="#1f1f1f" fo:font-family="Arial" style:font-family-asian="Arial" style:font-family-complex="Arial" fo:font-size="12pt"/>
    </style:style>
    <style:style style:parent-style-name="912" style:list-style-name="WWNum27" style:family="paragraph" style:name="P510">
      <style:paragraph-properties fo:line-height="115%" fo:margin-right="0cm" fo:margin-top="0pt" fo:margin-bottom="0pt" fo:border="none"/>
      <style:text-properties fo:font-family="Arial" style:font-family-asian="Arial" style:font-family-complex="Arial" fo:font-size="12pt"/>
    </style:style>
    <style:style style:family="text" style:name="T1138">
      <style:text-properties fo:color="#1f1f1f" fo:font-family="Arial" style:font-family-asian="Arial" style:font-family-complex="Arial" fo:font-size="12pt"/>
    </style:style>
    <style:style style:parent-style-name="912" style:list-style-name="WWNum27" style:family="paragraph" style:name="P511">
      <style:paragraph-properties fo:line-height="115%" fo:margin-right="0cm" fo:margin-top="0pt" fo:margin-bottom="0pt" fo:border="none"/>
      <style:text-properties fo:font-family="Arial" style:font-family-asian="Arial" style:font-family-complex="Arial" fo:font-size="12pt"/>
    </style:style>
    <style:style style:family="text" style:name="T1139">
      <style:text-properties fo:color="#1f1f1f" fo:font-family="Arial" style:font-family-asian="Arial" style:font-family-complex="Arial" fo:font-size="12pt"/>
    </style:style>
    <style:style style:parent-style-name="912" style:list-style-name="WWNum27" style:family="paragraph" style:name="P512">
      <style:paragraph-properties fo:line-height="115%" fo:margin-right="0cm" fo:margin-top="0pt" fo:margin-bottom="0pt" fo:border="none"/>
      <style:text-properties fo:font-family="Arial" style:font-family-asian="Arial" style:font-family-complex="Arial" fo:font-size="12pt"/>
    </style:style>
    <style:style style:family="text" style:name="T1140">
      <style:text-properties fo:color="#1f1f1f" fo:font-family="Arial" style:font-family-asian="Arial" style:font-family-complex="Arial" fo:font-size="12pt"/>
    </style:style>
    <style:style style:family="paragraph" style:name="P513">
      <style:paragraph-properties/>
      <style:text-properties/>
    </style:style>
    <style:style style:family="paragraph" style:name="P514">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141">
      <style:text-properties fo:color="#1f1f1f" fo:font-family="Arial" style:font-family-asian="Arial" style:font-family-complex="Arial" fo:font-size="12pt"/>
    </style:style>
    <style:style style:parent-style-name="851" style:family="paragraph" style:name="P51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42">
      <style:text-properties fo:color="#1f1f1f" fo:font-family="Arial" style:font-family-asian="Arial" style:font-family-complex="Arial" fo:font-size="14pt" fo:font-weight="bold"/>
    </style:style>
    <style:style style:family="paragraph" style:name="P51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43">
      <style:text-properties fo:color="#1f1f1f" fo:font-family="Arial" style:font-family-asian="Arial" style:font-family-complex="Arial" fo:font-size="12pt"/>
    </style:style>
    <style:style style:parent-style-name="852" style:family="paragraph" style:name="P51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44">
      <style:text-properties fo:color="#1f1f1f" fo:font-family="Arial" style:font-family-asian="Arial" style:font-family-complex="Arial" fo:font-size="12pt" fo:font-weight="bold"/>
    </style:style>
    <style:style style:family="paragraph" style:name="P51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45">
      <style:text-properties fo:color="#1f1f1f" fo:font-family="Arial" style:font-family-asian="Arial" style:font-family-complex="Arial" fo:font-size="12pt"/>
    </style:style>
    <style:style style:parent-style-name="852" style:family="paragraph" style:name="P51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46">
      <style:text-properties fo:color="#1f1f1f" fo:font-family="Arial" style:font-family-asian="Arial" style:font-family-complex="Arial" fo:font-size="12pt" fo:font-weight="bold"/>
    </style:style>
    <style:style style:family="paragraph" style:name="P52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47">
      <style:text-properties fo:color="#1f1f1f" fo:font-family="Arial" style:font-family-asian="Arial" style:font-family-complex="Arial" fo:font-size="12pt"/>
    </style:style>
    <style:style style:parent-style-name="852" style:family="paragraph" style:name="P52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48">
      <style:text-properties fo:color="#1f1f1f" fo:font-family="Arial" style:font-family-asian="Arial" style:font-family-complex="Arial" fo:font-size="12pt" fo:font-weight="bold"/>
    </style:style>
    <style:style style:family="paragraph" style:name="P52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49">
      <style:text-properties fo:color="#1f1f1f" fo:font-family="Arial" style:font-family-asian="Arial" style:font-family-complex="Arial" fo:font-size="12pt"/>
    </style:style>
    <style:style style:parent-style-name="852" style:family="paragraph" style:name="P52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50">
      <style:text-properties fo:color="#1f1f1f" fo:font-family="Arial" style:font-family-asian="Arial" style:font-family-complex="Arial" fo:font-size="12pt" fo:font-weight="bold"/>
    </style:style>
    <style:style style:family="paragraph" style:name="P52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51">
      <style:text-properties fo:color="#1f1f1f" fo:font-family="Arial" style:font-family-asian="Arial" style:font-family-complex="Arial" fo:font-size="12pt"/>
    </style:style>
    <style:style style:parent-style-name="851" style:family="paragraph" style:name="P52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52">
      <style:text-properties fo:color="#1f1f1f" fo:font-family="Arial" style:font-family-asian="Arial" style:font-family-complex="Arial" fo:font-size="14pt" fo:font-weight="bold"/>
    </style:style>
    <style:style style:parent-style-name="912" style:list-style-name="WWNum28" style:family="paragraph" style:name="P526">
      <style:paragraph-properties fo:line-height="115%" fo:margin-right="0cm" fo:margin-top="0pt" fo:margin-bottom="0pt" fo:border="none"/>
      <style:text-properties fo:font-family="Arial" style:font-family-asian="Arial" style:font-family-complex="Arial" fo:font-size="12pt"/>
    </style:style>
    <style:style style:family="text" style:name="T1153">
      <style:text-properties fo:color="#1f1f1f" fo:font-family="Arial" style:font-family-asian="Arial" style:font-family-complex="Arial" fo:font-size="12pt"/>
    </style:style>
    <style:style style:parent-style-name="912" style:list-style-name="WWNum28" style:family="paragraph" style:name="P527">
      <style:paragraph-properties fo:line-height="115%" fo:margin-right="0cm" fo:margin-top="0pt" fo:margin-bottom="0pt" fo:border="none"/>
      <style:text-properties fo:font-family="Arial" style:font-family-asian="Arial" style:font-family-complex="Arial" fo:font-size="12pt"/>
    </style:style>
    <style:style style:family="text" style:name="T1154">
      <style:text-properties fo:color="#1f1f1f" fo:font-family="Arial" style:font-family-asian="Arial" style:font-family-complex="Arial" fo:font-size="12pt"/>
    </style:style>
    <style:style style:parent-style-name="912" style:list-style-name="WWNum28" style:family="paragraph" style:name="P528">
      <style:paragraph-properties fo:line-height="115%" fo:margin-right="0cm" fo:margin-top="0pt" fo:margin-bottom="0pt" fo:border="none"/>
      <style:text-properties fo:font-family="Arial" style:font-family-asian="Arial" style:font-family-complex="Arial" fo:font-size="12pt"/>
    </style:style>
    <style:style style:family="text" style:name="T1155">
      <style:text-properties fo:color="#1f1f1f" fo:font-family="Arial" style:font-family-asian="Arial" style:font-family-complex="Arial" fo:font-size="12pt"/>
    </style:style>
    <style:style style:parent-style-name="912" style:list-style-name="WWNum28" style:family="paragraph" style:name="P529">
      <style:paragraph-properties fo:line-height="115%" fo:margin-right="0cm" fo:margin-top="0pt" fo:margin-bottom="0pt" fo:border="none"/>
      <style:text-properties fo:font-family="Arial" style:font-family-asian="Arial" style:font-family-complex="Arial" fo:font-size="12pt"/>
    </style:style>
    <style:style style:family="text" style:name="T1156">
      <style:text-properties fo:color="#1f1f1f" fo:font-family="Arial" style:font-family-asian="Arial" style:font-family-complex="Arial" fo:font-size="12pt"/>
    </style:style>
    <style:style style:family="paragraph" style:name="P530">
      <style:paragraph-properties/>
      <style:text-properties/>
    </style:style>
    <style:style style:parent-style-name="851" style:family="paragraph" style:name="P53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57">
      <style:text-properties fo:color="#1f1f1f" fo:font-family="Arial" style:font-family-asian="Arial" style:font-family-complex="Arial" fo:font-size="14pt" fo:font-weight="bold"/>
    </style:style>
    <style:style style:family="paragraph" style:name="P53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58">
      <style:text-properties fo:color="#1f1f1f" fo:font-family="Arial" style:font-family-asian="Arial" style:font-family-complex="Arial" fo:font-size="12pt"/>
    </style:style>
    <style:style style:parent-style-name="852" style:family="paragraph" style:name="P53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59">
      <style:text-properties fo:color="#1f1f1f" fo:font-family="Arial" style:font-family-asian="Arial" style:font-family-complex="Arial" fo:font-size="12pt" fo:font-weight="bold"/>
    </style:style>
    <style:style style:family="paragraph" style:name="P53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60">
      <style:text-properties fo:color="#1f1f1f" fo:font-family="Arial" style:font-family-asian="Arial" style:font-family-complex="Arial" fo:font-size="12pt"/>
    </style:style>
    <style:style style:parent-style-name="852" style:family="paragraph" style:name="P53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61">
      <style:text-properties fo:color="#1f1f1f" fo:font-family="Arial" style:font-family-asian="Arial" style:font-family-complex="Arial" fo:font-size="12pt" fo:font-weight="bold"/>
    </style:style>
    <style:style style:family="paragraph" style:name="P5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62">
      <style:text-properties fo:color="#1f1f1f" fo:font-family="Arial" style:font-family-asian="Arial" style:font-family-complex="Arial" fo:font-size="12pt"/>
    </style:style>
    <style:style style:parent-style-name="852" style:family="paragraph" style:name="P53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63">
      <style:text-properties fo:color="#1f1f1f" fo:font-family="Arial" style:font-family-asian="Arial" style:font-family-complex="Arial" fo:font-size="12pt" fo:font-weight="bold"/>
    </style:style>
    <style:style style:family="paragraph" style:name="P53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64">
      <style:text-properties fo:color="#1f1f1f" fo:font-family="Arial" style:font-family-asian="Arial" style:font-family-complex="Arial" fo:font-size="12pt"/>
    </style:style>
    <style:style style:family="text" style:name="T1165">
      <style:text-properties fo:color="#1f1f1f" fo:font-family="Arial" style:font-family-asian="Arial" style:font-family-complex="Arial" fo:font-size="12pt"/>
    </style:style>
    <style:style style:parent-style-name="852" style:family="paragraph" style:name="P5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66">
      <style:text-properties fo:color="#1f1f1f" fo:font-family="Arial" style:font-family-asian="Arial" style:font-family-complex="Arial" fo:font-size="12pt" fo:font-weight="bold"/>
    </style:style>
    <style:style style:family="paragraph" style:name="P5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67">
      <style:text-properties fo:color="#1f1f1f" fo:font-family="Arial" style:font-family-asian="Arial" style:font-family-complex="Arial" fo:font-size="12pt"/>
    </style:style>
    <style:style style:family="text" style:name="T1168">
      <style:text-properties fo:color="#1f1f1f" fo:font-family="Arial" style:font-family-asian="Arial" style:font-family-complex="Arial" fo:font-size="12pt"/>
    </style:style>
    <style:style style:parent-style-name="851" style:family="paragraph" style:name="P5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69">
      <style:text-properties fo:color="#1f1f1f" fo:font-family="Arial" style:font-family-asian="Arial" style:font-family-complex="Arial" fo:font-size="14pt" fo:font-weight="bold"/>
    </style:style>
    <style:style style:parent-style-name="912" style:list-style-name="WWNum29" style:family="paragraph" style:name="P542">
      <style:paragraph-properties fo:line-height="115%" fo:margin-right="0cm" fo:margin-top="0pt" fo:margin-bottom="0pt" fo:border="none"/>
      <style:text-properties fo:font-family="Arial" style:font-family-asian="Arial" style:font-family-complex="Arial" fo:font-size="12pt"/>
    </style:style>
    <style:style style:family="text" style:name="T1170">
      <style:text-properties fo:color="#1f1f1f" fo:font-family="Arial" style:font-family-asian="Arial" style:font-family-complex="Arial" fo:font-size="12pt"/>
    </style:style>
    <style:style style:parent-style-name="912" style:list-style-name="WWNum29" style:family="paragraph" style:name="P543">
      <style:paragraph-properties fo:line-height="115%" fo:margin-right="0cm" fo:margin-top="0pt" fo:margin-bottom="0pt" fo:border="none"/>
      <style:text-properties fo:font-family="Arial" style:font-family-asian="Arial" style:font-family-complex="Arial" fo:font-size="12pt"/>
    </style:style>
    <style:style style:family="text" style:name="T1171">
      <style:text-properties fo:color="#1f1f1f" fo:font-family="Arial" style:font-family-asian="Arial" style:font-family-complex="Arial" fo:font-size="12pt"/>
    </style:style>
    <style:style style:parent-style-name="912" style:list-style-name="WWNum29" style:family="paragraph" style:name="P544">
      <style:paragraph-properties fo:line-height="115%" fo:margin-right="0cm" fo:margin-top="0pt" fo:margin-bottom="0pt" fo:border="none"/>
      <style:text-properties fo:font-family="Arial" style:font-family-asian="Arial" style:font-family-complex="Arial" fo:font-size="12pt"/>
    </style:style>
    <style:style style:family="text" style:name="T1172">
      <style:text-properties fo:color="#1f1f1f" fo:font-family="Arial" style:font-family-asian="Arial" style:font-family-complex="Arial" fo:font-size="12pt"/>
    </style:style>
    <style:style style:parent-style-name="912" style:list-style-name="WWNum29" style:family="paragraph" style:name="P545">
      <style:paragraph-properties fo:line-height="115%" fo:margin-right="0cm" fo:margin-top="0pt" fo:margin-bottom="0pt" fo:border="none"/>
      <style:text-properties fo:font-family="Arial" style:font-family-asian="Arial" style:font-family-complex="Arial" fo:font-size="12pt"/>
    </style:style>
    <style:style style:family="text" style:name="T1173">
      <style:text-properties fo:color="#1f1f1f" fo:font-family="Arial" style:font-family-asian="Arial" style:font-family-complex="Arial" fo:font-size="12pt"/>
    </style:style>
    <style:style style:family="paragraph" style:name="P546">
      <style:paragraph-properties/>
      <style:text-properties/>
    </style:style>
    <style:style style:family="paragraph" style:name="P54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174">
      <style:text-properties fo:color="#1f1f1f" fo:font-family="Arial" style:font-family-asian="Arial" style:font-family-complex="Arial" fo:font-size="12pt"/>
    </style:style>
    <style:style style:parent-style-name="851" style:family="paragraph" style:name="P54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75">
      <style:text-properties fo:color="#1f1f1f" fo:font-family="Arial" style:font-family-asian="Arial" style:font-family-complex="Arial" fo:font-size="14pt" fo:font-weight="bold"/>
    </style:style>
    <style:style style:family="paragraph" style:name="P54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76">
      <style:text-properties fo:color="#1f1f1f" fo:font-family="Arial" style:font-family-asian="Arial" style:font-family-complex="Arial" fo:font-size="12pt"/>
    </style:style>
    <style:style style:parent-style-name="852" style:family="paragraph" style:name="P55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77">
      <style:text-properties fo:color="#1f1f1f" fo:font-family="Arial" style:font-family-asian="Arial" style:font-family-complex="Arial" fo:font-size="12pt" fo:font-weight="bold"/>
    </style:style>
    <style:style style:family="paragraph" style:name="P55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78">
      <style:text-properties fo:color="#1f1f1f" fo:font-family="Arial" style:font-family-asian="Arial" style:font-family-complex="Arial" fo:font-size="12pt"/>
    </style:style>
    <style:style style:parent-style-name="852" style:family="paragraph" style:name="P55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79">
      <style:text-properties fo:color="#1f1f1f" fo:font-family="Arial" style:font-family-asian="Arial" style:font-family-complex="Arial" fo:font-size="12pt" fo:font-weight="bold"/>
    </style:style>
    <style:style style:family="paragraph" style:name="P55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80">
      <style:text-properties fo:color="#1f1f1f" fo:font-family="Arial" style:font-family-asian="Arial" style:font-family-complex="Arial" fo:font-size="12pt"/>
    </style:style>
    <style:style style:parent-style-name="912" style:list-style-name="WWNum30" style:family="paragraph" style:name="P554">
      <style:paragraph-properties fo:line-height="115%" fo:margin-right="0cm" fo:margin-top="0pt" fo:margin-bottom="0pt" fo:border="none"/>
      <style:text-properties fo:font-family="Arial" style:font-family-asian="Arial" style:font-family-complex="Arial" fo:font-size="12pt"/>
    </style:style>
    <style:style style:family="text" style:name="T1181">
      <style:text-properties fo:color="#1f1f1f" fo:font-family="Arial" style:font-family-asian="Arial" style:font-family-complex="Arial" fo:font-size="12pt"/>
    </style:style>
    <style:style style:parent-style-name="912" style:list-style-name="WWNum30" style:family="paragraph" style:name="P555">
      <style:paragraph-properties fo:line-height="115%" fo:margin-right="0cm" fo:margin-top="0pt" fo:margin-bottom="0pt" fo:border="none"/>
      <style:text-properties fo:font-family="Arial" style:font-family-asian="Arial" style:font-family-complex="Arial" fo:font-size="12pt"/>
    </style:style>
    <style:style style:family="text" style:name="T1182">
      <style:text-properties fo:color="#1f1f1f" fo:font-family="Arial" style:font-family-asian="Arial" style:font-family-complex="Arial" fo:font-size="12pt"/>
    </style:style>
    <style:style style:parent-style-name="912" style:list-style-name="WWNum30" style:family="paragraph" style:name="P556">
      <style:paragraph-properties fo:line-height="115%" fo:margin-right="0cm" fo:margin-top="0pt" fo:margin-bottom="0pt" fo:border="none"/>
      <style:text-properties fo:font-family="Arial" style:font-family-asian="Arial" style:font-family-complex="Arial" fo:font-size="12pt"/>
    </style:style>
    <style:style style:family="text" style:name="T1183">
      <style:text-properties fo:color="#1f1f1f" fo:font-family="Arial" style:font-family-asian="Arial" style:font-family-complex="Arial" fo:font-size="12pt"/>
    </style:style>
    <style:style style:parent-style-name="852" style:family="paragraph" style:name="P55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84">
      <style:text-properties fo:color="#1f1f1f" fo:font-family="Arial" style:font-family-asian="Arial" style:font-family-complex="Arial" fo:font-size="12pt" fo:font-weight="bold"/>
    </style:style>
    <style:style style:family="paragraph" style:name="P55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85">
      <style:text-properties fo:color="#1f1f1f" fo:font-family="Arial" style:font-family-asian="Arial" style:font-family-complex="Arial" fo:font-size="12pt"/>
    </style:style>
    <style:style style:family="table" style:name="ta4">
      <style:paragraph-properties fo:line-height="100%" fo:margin-bottom="0pt"/>
      <style:table-properties style:width="9.601cm" fo:margin-left="0cm" table:align="left" style:use-optimal-column-width="true"/>
    </style:style>
    <style:style style:family="table-column" style:name="co9">
      <style:table-column-properties style:column-width="1.667cm" style:use-optimal-column-width="true"/>
    </style:style>
    <style:style style:family="table-column" style:name="co10">
      <style:table-column-properties style:column-width="2.949cm" style:use-optimal-column-width="true"/>
    </style:style>
    <style:style style:family="table-column" style:name="co11">
      <style:table-column-properties style:column-width="4.985cm" style:use-optimal-column-width="true"/>
    </style:style>
    <style:style style:family="table-row" style:name="ro12">
      <style:table-row-properties/>
    </style:style>
    <style:style style:family="table-cell" style:name="ce3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59">
      <style:paragraph-properties style:line-height-at-least="12pt" fo:margin-top="0pt" fo:margin-bottom="0pt"/>
      <style:text-properties/>
    </style:style>
    <style:style style:family="text" style:name="T1186">
      <style:text-properties fo:color="#1f1f1f" fo:font-family="Arial" style:font-family-asian="Arial" style:font-family-complex="Arial" fo:font-size="12pt" fo:font-weight="bold"/>
    </style:style>
    <style:style style:family="table-cell" style:name="ce3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0">
      <style:paragraph-properties style:line-height-at-least="12pt" fo:margin-top="0pt" fo:margin-bottom="0pt"/>
      <style:text-properties/>
    </style:style>
    <style:style style:family="text" style:name="T1187">
      <style:text-properties fo:color="#1f1f1f" fo:font-family="Arial" style:font-family-asian="Arial" style:font-family-complex="Arial" fo:font-size="12pt" fo:font-weight="bold"/>
    </style:style>
    <style:style style:family="table-cell" style:name="ce3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1">
      <style:paragraph-properties style:line-height-at-least="12pt" fo:margin-top="0pt" fo:margin-bottom="0pt"/>
      <style:text-properties/>
    </style:style>
    <style:style style:family="text" style:name="T1188">
      <style:text-properties fo:color="#1f1f1f" fo:font-family="Arial" style:font-family-asian="Arial" style:font-family-complex="Arial" fo:font-size="12pt" fo:font-weight="bold"/>
    </style:style>
    <style:style style:family="table-row" style:name="ro13">
      <style:table-row-properties/>
    </style:style>
    <style:style style:family="table-cell" style:name="ce3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2">
      <style:paragraph-properties style:line-height-at-least="12pt" fo:margin-top="0pt" fo:margin-bottom="0pt"/>
      <style:text-properties/>
    </style:style>
    <style:style style:family="text" style:name="T1189">
      <style:text-properties fo:color="#1f1f1f" fo:font-family="Arial" style:font-family-asian="Arial" style:font-family-complex="Arial" fo:font-size="12pt"/>
    </style:style>
    <style:style style:family="table-cell" style:name="ce3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3">
      <style:paragraph-properties style:line-height-at-least="12pt" fo:margin-top="0pt" fo:margin-bottom="0pt"/>
      <style:text-properties/>
    </style:style>
    <style:style style:family="text" style:name="T1190">
      <style:text-properties fo:color="#1f1f1f" fo:font-family="Arial" style:font-family-asian="Arial" style:font-family-complex="Arial" fo:font-size="12pt"/>
    </style:style>
    <style:style style:family="table-cell" style:name="ce3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4">
      <style:paragraph-properties style:line-height-at-least="12pt" fo:margin-top="0pt" fo:margin-bottom="0pt"/>
      <style:text-properties/>
    </style:style>
    <style:style style:family="text" style:name="T1191">
      <style:text-properties fo:color="#1f1f1f" fo:font-family="Arial" style:font-family-asian="Arial" style:font-family-complex="Arial" fo:font-size="12pt"/>
    </style:style>
    <style:style style:family="table-row" style:name="ro14">
      <style:table-row-properties/>
    </style:style>
    <style:style style:family="table-cell" style:name="ce4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5">
      <style:paragraph-properties style:line-height-at-least="12pt" fo:margin-top="0pt" fo:margin-bottom="0pt"/>
      <style:text-properties/>
    </style:style>
    <style:style style:family="text" style:name="T1192">
      <style:text-properties fo:color="#1f1f1f" fo:font-family="Arial" style:font-family-asian="Arial" style:font-family-complex="Arial" fo:font-size="12pt"/>
    </style:style>
    <style:style style:family="table-cell" style:name="ce4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6">
      <style:paragraph-properties style:line-height-at-least="12pt" fo:margin-top="0pt" fo:margin-bottom="0pt"/>
      <style:text-properties/>
    </style:style>
    <style:style style:family="text" style:name="T1193">
      <style:text-properties fo:color="#1f1f1f" fo:font-family="Arial" style:font-family-asian="Arial" style:font-family-complex="Arial" fo:font-size="12pt"/>
    </style:style>
    <style:style style:family="table-cell" style:name="ce4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7">
      <style:paragraph-properties style:line-height-at-least="12pt" fo:margin-top="0pt" fo:margin-bottom="0pt"/>
      <style:text-properties/>
    </style:style>
    <style:style style:family="text" style:name="T1194">
      <style:text-properties fo:color="#1f1f1f" fo:font-family="Arial" style:font-family-asian="Arial" style:font-family-complex="Arial" fo:font-size="12pt"/>
    </style:style>
    <style:style style:family="table-row" style:name="ro15">
      <style:table-row-properties/>
    </style:style>
    <style:style style:family="table-cell" style:name="ce4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8">
      <style:paragraph-properties style:line-height-at-least="12pt" fo:margin-top="0pt" fo:margin-bottom="0pt"/>
      <style:text-properties/>
    </style:style>
    <style:style style:family="text" style:name="T1195">
      <style:text-properties fo:color="#1f1f1f" fo:font-family="Arial" style:font-family-asian="Arial" style:font-family-complex="Arial" fo:font-size="12pt"/>
    </style:style>
    <style:style style:family="table-cell" style:name="ce4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69">
      <style:paragraph-properties style:line-height-at-least="12pt" fo:margin-top="0pt" fo:margin-bottom="0pt"/>
      <style:text-properties/>
    </style:style>
    <style:style style:family="text" style:name="T1196">
      <style:text-properties fo:color="#1f1f1f" fo:font-family="Arial" style:font-family-asian="Arial" style:font-family-complex="Arial" fo:font-size="12pt"/>
    </style:style>
    <style:style style:family="table-cell" style:name="ce4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570">
      <style:paragraph-properties style:line-height-at-least="12pt" fo:margin-top="0pt" fo:margin-bottom="0pt"/>
      <style:text-properties/>
    </style:style>
    <style:style style:family="text" style:name="T1197">
      <style:text-properties fo:color="#1f1f1f" fo:font-family="Arial" style:font-family-asian="Arial" style:font-family-complex="Arial" fo:font-size="12pt"/>
    </style:style>
    <style:style style:parent-style-name="852" style:family="paragraph" style:name="P57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198">
      <style:text-properties fo:color="#1f1f1f" fo:font-family="Arial" style:font-family-asian="Arial" style:font-family-complex="Arial" fo:font-size="12pt" fo:font-weight="bold"/>
    </style:style>
    <style:style style:family="paragraph" style:name="P57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199">
      <style:text-properties fo:color="#1f1f1f" fo:font-family="Arial" style:font-family-asian="Arial" style:font-family-complex="Arial" fo:font-size="12pt"/>
    </style:style>
    <style:style style:parent-style-name="851" style:family="paragraph" style:name="P57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00">
      <style:text-properties fo:color="#1f1f1f" fo:font-family="Arial" style:font-family-asian="Arial" style:font-family-complex="Arial" fo:font-size="14pt" fo:font-weight="bold"/>
    </style:style>
    <style:style style:parent-style-name="912" style:list-style-name="WWNum30" style:family="paragraph" style:name="P574">
      <style:paragraph-properties fo:line-height="115%" fo:margin-right="0cm" fo:margin-top="0pt" fo:margin-bottom="0pt" fo:border="none"/>
      <style:text-properties fo:font-family="Arial" style:font-family-asian="Arial" style:font-family-complex="Arial" fo:font-size="12pt"/>
    </style:style>
    <style:style style:family="text" style:name="T1201">
      <style:text-properties fo:color="#1f1f1f" fo:font-family="Arial" style:font-family-asian="Arial" style:font-family-complex="Arial" fo:font-size="12pt"/>
    </style:style>
    <style:style style:parent-style-name="912" style:list-style-name="WWNum30" style:family="paragraph" style:name="P575">
      <style:paragraph-properties fo:line-height="115%" fo:margin-right="0cm" fo:margin-top="0pt" fo:margin-bottom="0pt" fo:border="none"/>
      <style:text-properties fo:font-family="Arial" style:font-family-asian="Arial" style:font-family-complex="Arial" fo:font-size="12pt"/>
    </style:style>
    <style:style style:family="text" style:name="T1202">
      <style:text-properties fo:color="#1f1f1f" fo:font-family="Arial" style:font-family-asian="Arial" style:font-family-complex="Arial" fo:font-size="12pt"/>
    </style:style>
    <style:style style:parent-style-name="912" style:list-style-name="WWNum30" style:family="paragraph" style:name="P576">
      <style:paragraph-properties fo:line-height="115%" fo:margin-right="0cm" fo:margin-top="0pt" fo:margin-bottom="0pt" fo:border="none"/>
      <style:text-properties fo:font-family="Arial" style:font-family-asian="Arial" style:font-family-complex="Arial" fo:font-size="12pt"/>
    </style:style>
    <style:style style:family="text" style:name="T1203">
      <style:text-properties fo:color="#1f1f1f" fo:font-family="Arial" style:font-family-asian="Arial" style:font-family-complex="Arial" fo:font-size="12pt"/>
    </style:style>
    <style:style style:parent-style-name="912" style:list-style-name="WWNum30" style:family="paragraph" style:name="P577">
      <style:paragraph-properties fo:line-height="115%" fo:margin-right="0cm" fo:margin-top="0pt" fo:margin-bottom="0pt" fo:border="none"/>
      <style:text-properties fo:font-family="Arial" style:font-family-asian="Arial" style:font-family-complex="Arial" fo:font-size="12pt"/>
    </style:style>
    <style:style style:family="text" style:name="T1204">
      <style:text-properties fo:color="#1f1f1f" fo:font-family="Arial" style:font-family-asian="Arial" style:font-family-complex="Arial" fo:font-size="12pt"/>
    </style:style>
    <style:style style:family="paragraph" style:name="P578">
      <style:paragraph-properties/>
      <style:text-properties/>
    </style:style>
    <style:style style:parent-style-name="851" style:family="paragraph" style:name="P57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05">
      <style:text-properties fo:color="#1f1f1f" fo:font-family="Arial" style:font-family-asian="Arial" style:font-family-complex="Arial" fo:font-size="14pt" fo:font-weight="bold"/>
    </style:style>
    <style:style style:family="paragraph" style:name="P58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06">
      <style:text-properties fo:color="#1f1f1f" fo:font-family="Arial" style:font-family-asian="Arial" style:font-family-complex="Arial" fo:font-size="12pt"/>
    </style:style>
    <style:style style:parent-style-name="852" style:family="paragraph" style:name="P58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07">
      <style:text-properties fo:color="#1f1f1f" fo:font-family="Arial" style:font-family-asian="Arial" style:font-family-complex="Arial" fo:font-size="12pt" fo:font-weight="bold"/>
    </style:style>
    <style:style style:family="paragraph" style:name="P58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08">
      <style:text-properties fo:color="#1f1f1f" fo:font-family="Arial" style:font-family-asian="Arial" style:font-family-complex="Arial" fo:font-size="12pt"/>
    </style:style>
    <style:style style:family="text" style:name="T1209">
      <style:text-properties fo:color="#1f1f1f" fo:font-family="Arial" style:font-family-asian="Arial" style:font-family-complex="Arial" fo:font-size="12pt"/>
    </style:style>
    <style:style style:parent-style-name="852" style:family="paragraph" style:name="P58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10">
      <style:text-properties fo:color="#1f1f1f" fo:font-family="Arial" style:font-family-asian="Arial" style:font-family-complex="Arial" fo:font-size="12pt" fo:font-weight="bold"/>
    </style:style>
    <style:style style:family="paragraph" style:name="P58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11">
      <style:text-properties fo:color="#1f1f1f" fo:font-family="Arial" style:font-family-asian="Arial" style:font-family-complex="Arial" fo:font-size="12pt"/>
    </style:style>
    <style:style style:family="text" style:name="T1212">
      <style:text-properties fo:color="#1f1f1f" fo:font-family="Arial" style:font-family-asian="Arial" style:font-family-complex="Arial" fo:font-size="12pt"/>
    </style:style>
    <style:style style:parent-style-name="852" style:family="paragraph" style:name="P58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13">
      <style:text-properties fo:color="#1f1f1f" fo:font-family="Arial" style:font-family-asian="Arial" style:font-family-complex="Arial" fo:font-size="12pt" fo:font-weight="bold"/>
    </style:style>
    <style:style style:family="paragraph" style:name="P58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14">
      <style:text-properties fo:color="#1f1f1f" fo:font-family="Arial" style:font-family-asian="Arial" style:font-family-complex="Arial" fo:font-size="12pt"/>
    </style:style>
    <style:style style:family="text" style:name="T1215">
      <style:text-properties fo:color="#1f1f1f" fo:font-family="Arial" style:font-family-asian="Arial" style:font-family-complex="Arial" fo:font-size="12pt"/>
    </style:style>
    <style:style style:parent-style-name="852" style:family="paragraph" style:name="P58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16">
      <style:text-properties fo:color="#1f1f1f" fo:font-family="Arial" style:font-family-asian="Arial" style:font-family-complex="Arial" fo:font-size="12pt" fo:font-weight="bold"/>
    </style:style>
    <style:style style:family="paragraph" style:name="P58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17">
      <style:text-properties fo:color="#1f1f1f" fo:font-family="Arial" style:font-family-asian="Arial" style:font-family-complex="Arial" fo:font-size="12pt"/>
    </style:style>
    <style:style style:family="text" style:name="T1218">
      <style:text-properties fo:color="#1f1f1f" fo:font-family="Arial" style:font-family-asian="Arial" style:font-family-complex="Arial" fo:font-size="12pt"/>
    </style:style>
    <style:style style:parent-style-name="851" style:family="paragraph" style:name="P58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19">
      <style:text-properties fo:color="#1f1f1f" fo:font-family="Arial" style:font-family-asian="Arial" style:font-family-complex="Arial" fo:font-size="14pt" fo:font-weight="bold"/>
    </style:style>
    <style:style style:parent-style-name="912" style:list-style-name="WWNum31" style:family="paragraph" style:name="P590">
      <style:paragraph-properties fo:line-height="115%" fo:margin-right="0cm" fo:margin-top="0pt" fo:margin-bottom="0pt" fo:border="none"/>
      <style:text-properties fo:font-family="Arial" style:font-family-asian="Arial" style:font-family-complex="Arial" fo:font-size="12pt"/>
    </style:style>
    <style:style style:family="text" style:name="T1220">
      <style:text-properties fo:color="#1f1f1f" fo:font-family="Arial" style:font-family-asian="Arial" style:font-family-complex="Arial" fo:font-size="12pt"/>
    </style:style>
    <style:style style:parent-style-name="912" style:list-style-name="WWNum31" style:family="paragraph" style:name="P591">
      <style:paragraph-properties fo:line-height="115%" fo:margin-right="0cm" fo:margin-top="0pt" fo:margin-bottom="0pt" fo:border="none"/>
      <style:text-properties fo:font-family="Arial" style:font-family-asian="Arial" style:font-family-complex="Arial" fo:font-size="12pt"/>
    </style:style>
    <style:style style:family="text" style:name="T1221">
      <style:text-properties fo:color="#1f1f1f" fo:font-family="Arial" style:font-family-asian="Arial" style:font-family-complex="Arial" fo:font-size="12pt"/>
    </style:style>
    <style:style style:parent-style-name="912" style:list-style-name="WWNum31" style:family="paragraph" style:name="P592">
      <style:paragraph-properties fo:line-height="115%" fo:margin-right="0cm" fo:margin-top="0pt" fo:margin-bottom="0pt" fo:border="none"/>
      <style:text-properties fo:font-family="Arial" style:font-family-asian="Arial" style:font-family-complex="Arial" fo:font-size="12pt"/>
    </style:style>
    <style:style style:family="text" style:name="T1222">
      <style:text-properties fo:color="#1f1f1f" fo:font-family="Arial" style:font-family-asian="Arial" style:font-family-complex="Arial" fo:font-size="12pt"/>
    </style:style>
    <style:style style:parent-style-name="912" style:list-style-name="WWNum31" style:family="paragraph" style:name="P593">
      <style:paragraph-properties fo:line-height="115%" fo:margin-right="0cm" fo:margin-top="0pt" fo:margin-bottom="0pt" fo:border="none"/>
      <style:text-properties fo:font-family="Arial" style:font-family-asian="Arial" style:font-family-complex="Arial" fo:font-size="12pt"/>
    </style:style>
    <style:style style:family="text" style:name="T1223">
      <style:text-properties fo:color="#1f1f1f" fo:font-family="Arial" style:font-family-asian="Arial" style:font-family-complex="Arial" fo:font-size="12pt"/>
    </style:style>
    <style:style style:family="paragraph" style:name="P594">
      <style:paragraph-properties/>
      <style:text-properties/>
    </style:style>
    <style:style style:family="paragraph" style:name="P595">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224">
      <style:text-properties fo:color="#1f1f1f" fo:font-family="Arial" style:font-family-asian="Arial" style:font-family-complex="Arial" fo:font-size="12pt"/>
    </style:style>
    <style:style style:parent-style-name="851" style:family="paragraph" style:name="P59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25">
      <style:text-properties fo:color="#1f1f1f" fo:font-family="Arial" style:font-family-asian="Arial" style:font-family-complex="Arial" fo:font-size="14pt" fo:font-weight="bold"/>
    </style:style>
    <style:style style:family="paragraph" style:name="P59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26">
      <style:text-properties fo:color="#1f1f1f" fo:font-family="Arial" style:font-family-asian="Arial" style:font-family-complex="Arial" fo:font-size="12pt"/>
    </style:style>
    <style:style style:parent-style-name="852" style:family="paragraph" style:name="P59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27">
      <style:text-properties fo:color="#1f1f1f" fo:font-family="Arial" style:font-family-asian="Arial" style:font-family-complex="Arial" fo:font-size="12pt" fo:font-weight="bold"/>
    </style:style>
    <style:style style:family="paragraph" style:name="P59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28">
      <style:text-properties fo:color="#1f1f1f" fo:font-family="Arial" style:font-family-asian="Arial" style:font-family-complex="Arial" fo:font-size="12pt"/>
    </style:style>
    <style:style style:parent-style-name="852" style:family="paragraph" style:name="P60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29">
      <style:text-properties fo:color="#1f1f1f" fo:font-family="Arial" style:font-family-asian="Arial" style:font-family-complex="Arial" fo:font-size="12pt" fo:font-weight="bold"/>
    </style:style>
    <style:style style:family="paragraph" style:name="P60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30">
      <style:text-properties fo:color="#1f1f1f" fo:font-family="Arial" style:font-family-asian="Arial" style:font-family-complex="Arial" fo:font-size="12pt"/>
    </style:style>
    <style:style style:parent-style-name="852" style:family="paragraph" style:name="P60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31">
      <style:text-properties fo:color="#1f1f1f" fo:font-family="Arial" style:font-family-asian="Arial" style:font-family-complex="Arial" fo:font-size="12pt" fo:font-weight="bold"/>
    </style:style>
    <style:style style:family="paragraph" style:name="P60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32">
      <style:text-properties fo:color="#1f1f1f" fo:font-family="Arial" style:font-family-asian="Arial" style:font-family-complex="Arial" fo:font-size="12pt"/>
    </style:style>
    <style:style style:parent-style-name="852" style:family="paragraph" style:name="P60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33">
      <style:text-properties fo:color="#1f1f1f" fo:font-family="Arial" style:font-family-asian="Arial" style:font-family-complex="Arial" fo:font-size="12pt" fo:font-weight="bold"/>
    </style:style>
    <style:style style:family="paragraph" style:name="P60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34">
      <style:text-properties fo:color="#1f1f1f" fo:font-family="Arial" style:font-family-asian="Arial" style:font-family-complex="Arial" fo:font-size="12pt"/>
    </style:style>
    <style:style style:parent-style-name="851" style:family="paragraph" style:name="P60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35">
      <style:text-properties fo:color="#1f1f1f" fo:font-family="Arial" style:font-family-asian="Arial" style:font-family-complex="Arial" fo:font-size="14pt" fo:font-weight="bold"/>
    </style:style>
    <style:style style:parent-style-name="912" style:list-style-name="WWNum32" style:family="paragraph" style:name="P607">
      <style:paragraph-properties fo:line-height="115%" fo:margin-right="0cm" fo:margin-top="0pt" fo:margin-bottom="0pt" fo:border="none"/>
      <style:text-properties fo:font-family="Arial" style:font-family-asian="Arial" style:font-family-complex="Arial" fo:font-size="12pt"/>
    </style:style>
    <style:style style:family="text" style:name="T1236">
      <style:text-properties fo:color="#1f1f1f" fo:font-family="Arial" style:font-family-asian="Arial" style:font-family-complex="Arial" fo:font-size="12pt"/>
    </style:style>
    <style:style style:parent-style-name="912" style:list-style-name="WWNum32" style:family="paragraph" style:name="P608">
      <style:paragraph-properties fo:line-height="115%" fo:margin-right="0cm" fo:margin-top="0pt" fo:margin-bottom="0pt" fo:border="none"/>
      <style:text-properties fo:font-family="Arial" style:font-family-asian="Arial" style:font-family-complex="Arial" fo:font-size="12pt"/>
    </style:style>
    <style:style style:family="text" style:name="T1237">
      <style:text-properties fo:color="#1f1f1f" fo:font-family="Arial" style:font-family-asian="Arial" style:font-family-complex="Arial" fo:font-size="12pt"/>
    </style:style>
    <style:style style:parent-style-name="912" style:list-style-name="WWNum32" style:family="paragraph" style:name="P609">
      <style:paragraph-properties fo:line-height="115%" fo:margin-right="0cm" fo:margin-top="0pt" fo:margin-bottom="0pt" fo:border="none"/>
      <style:text-properties fo:font-family="Arial" style:font-family-asian="Arial" style:font-family-complex="Arial" fo:font-size="12pt"/>
    </style:style>
    <style:style style:family="text" style:name="T1238">
      <style:text-properties fo:color="#1f1f1f" fo:font-family="Arial" style:font-family-asian="Arial" style:font-family-complex="Arial" fo:font-size="12pt"/>
    </style:style>
    <style:style style:parent-style-name="912" style:list-style-name="WWNum32" style:family="paragraph" style:name="P610">
      <style:paragraph-properties fo:line-height="115%" fo:margin-right="0cm" fo:margin-top="0pt" fo:margin-bottom="0pt" fo:border="none"/>
      <style:text-properties fo:font-family="Arial" style:font-family-asian="Arial" style:font-family-complex="Arial" fo:font-size="12pt"/>
    </style:style>
    <style:style style:family="text" style:name="T1239">
      <style:text-properties fo:color="#1f1f1f" fo:font-family="Arial" style:font-family-asian="Arial" style:font-family-complex="Arial" fo:font-size="12pt"/>
    </style:style>
    <style:style style:family="paragraph" style:name="P611">
      <style:paragraph-properties/>
      <style:text-properties/>
    </style:style>
    <style:style style:parent-style-name="851" style:family="paragraph" style:name="P61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40">
      <style:text-properties fo:color="#1f1f1f" fo:font-family="Arial" style:font-family-asian="Arial" style:font-family-complex="Arial" fo:font-size="14pt" fo:font-weight="bold"/>
    </style:style>
    <style:style style:family="paragraph" style:name="P61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41">
      <style:text-properties fo:color="#1f1f1f" fo:font-family="Arial" style:font-family-asian="Arial" style:font-family-complex="Arial" fo:font-size="12pt"/>
    </style:style>
    <style:style style:parent-style-name="852" style:family="paragraph" style:name="P61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42">
      <style:text-properties fo:color="#1f1f1f" fo:font-family="Arial" style:font-family-asian="Arial" style:font-family-complex="Arial" fo:font-size="12pt" fo:font-weight="bold"/>
    </style:style>
    <style:style style:family="paragraph" style:name="P61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43">
      <style:text-properties fo:color="#1f1f1f" fo:font-family="Arial" style:font-family-asian="Arial" style:font-family-complex="Arial" fo:font-size="12pt"/>
    </style:style>
    <style:style style:parent-style-name="852" style:family="paragraph" style:name="P61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44">
      <style:text-properties fo:color="#1f1f1f" fo:font-family="Arial" style:font-family-asian="Arial" style:font-family-complex="Arial" fo:font-size="12pt" fo:font-weight="bold"/>
    </style:style>
    <style:style style:family="paragraph" style:name="P61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45">
      <style:text-properties fo:color="#1f1f1f" fo:font-family="Arial" style:font-family-asian="Arial" style:font-family-complex="Arial" fo:font-size="12pt"/>
    </style:style>
    <style:style style:parent-style-name="852" style:family="paragraph" style:name="P61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46">
      <style:text-properties fo:color="#1f1f1f" fo:font-family="Arial" style:font-family-asian="Arial" style:font-family-complex="Arial" fo:font-size="12pt" fo:font-weight="bold"/>
    </style:style>
    <style:style style:family="paragraph" style:name="P6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47">
      <style:text-properties fo:color="#1f1f1f" fo:font-family="Arial" style:font-family-asian="Arial" style:font-family-complex="Arial" fo:font-size="12pt"/>
    </style:style>
    <style:style style:parent-style-name="852" style:family="paragraph" style:name="P62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48">
      <style:text-properties fo:color="#1f1f1f" fo:font-family="Arial" style:font-family-asian="Arial" style:font-family-complex="Arial" fo:font-size="12pt" fo:font-weight="bold"/>
    </style:style>
    <style:style style:family="paragraph" style:name="P6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49">
      <style:text-properties fo:color="#1f1f1f" fo:font-family="Arial" style:font-family-asian="Arial" style:font-family-complex="Arial" fo:font-size="12pt"/>
    </style:style>
    <style:style style:parent-style-name="851" style:family="paragraph" style:name="P62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50">
      <style:text-properties fo:color="#1f1f1f" fo:font-family="Arial" style:font-family-asian="Arial" style:font-family-complex="Arial" fo:font-size="14pt" fo:font-weight="bold"/>
    </style:style>
    <style:style style:parent-style-name="912" style:list-style-name="WWNum33" style:family="paragraph" style:name="P623">
      <style:paragraph-properties fo:line-height="115%" fo:margin-right="0cm" fo:margin-top="0pt" fo:margin-bottom="0pt" fo:border="none"/>
      <style:text-properties fo:font-family="Arial" style:font-family-asian="Arial" style:font-family-complex="Arial" fo:font-size="12pt"/>
    </style:style>
    <style:style style:family="text" style:name="T1251">
      <style:text-properties fo:color="#1f1f1f" fo:font-family="Arial" style:font-family-asian="Arial" style:font-family-complex="Arial" fo:font-size="12pt"/>
    </style:style>
    <style:style style:parent-style-name="912" style:list-style-name="WWNum33" style:family="paragraph" style:name="P624">
      <style:paragraph-properties fo:line-height="115%" fo:margin-right="0cm" fo:margin-top="0pt" fo:margin-bottom="0pt" fo:border="none"/>
      <style:text-properties fo:font-family="Arial" style:font-family-asian="Arial" style:font-family-complex="Arial" fo:font-size="12pt"/>
    </style:style>
    <style:style style:family="text" style:name="T1252">
      <style:text-properties fo:color="#1f1f1f" fo:font-family="Arial" style:font-family-asian="Arial" style:font-family-complex="Arial" fo:font-size="12pt"/>
    </style:style>
    <style:style style:parent-style-name="912" style:list-style-name="WWNum33" style:family="paragraph" style:name="P625">
      <style:paragraph-properties fo:line-height="115%" fo:margin-right="0cm" fo:margin-top="0pt" fo:margin-bottom="0pt" fo:border="none"/>
      <style:text-properties fo:font-family="Arial" style:font-family-asian="Arial" style:font-family-complex="Arial" fo:font-size="12pt"/>
    </style:style>
    <style:style style:family="text" style:name="T1253">
      <style:text-properties fo:color="#1f1f1f" fo:font-family="Arial" style:font-family-asian="Arial" style:font-family-complex="Arial" fo:font-size="12pt"/>
    </style:style>
    <style:style style:parent-style-name="912" style:list-style-name="WWNum33" style:family="paragraph" style:name="P626">
      <style:paragraph-properties fo:line-height="115%" fo:margin-right="0cm" fo:margin-top="0pt" fo:margin-bottom="0pt" fo:border="none"/>
      <style:text-properties fo:font-family="Arial" style:font-family-asian="Arial" style:font-family-complex="Arial" fo:font-size="12pt"/>
    </style:style>
    <style:style style:family="text" style:name="T1254">
      <style:text-properties fo:color="#1f1f1f" fo:font-family="Arial" style:font-family-asian="Arial" style:font-family-complex="Arial" fo:font-size="12pt"/>
    </style:style>
    <style:style style:family="paragraph" style:name="P627">
      <style:paragraph-properties/>
      <style:text-properties/>
    </style:style>
    <style:style style:parent-style-name="851" style:family="paragraph" style:name="P62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55">
      <style:text-properties fo:color="#1f1f1f" fo:font-family="Arial" style:font-family-asian="Arial" style:font-family-complex="Arial" fo:font-size="14pt" fo:font-weight="bold"/>
    </style:style>
    <style:style style:family="paragraph" style:name="P62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56">
      <style:text-properties fo:color="#1f1f1f" fo:font-family="Arial" style:font-family-asian="Arial" style:font-family-complex="Arial" fo:font-size="12pt"/>
    </style:style>
    <style:style style:parent-style-name="852" style:family="paragraph" style:name="P63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57">
      <style:text-properties fo:color="#1f1f1f" fo:font-family="Arial" style:font-family-asian="Arial" style:font-family-complex="Arial" fo:font-size="12pt" fo:font-weight="bold"/>
    </style:style>
    <style:style style:family="paragraph" style:name="P63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58">
      <style:text-properties fo:color="#1f1f1f" fo:font-family="Arial" style:font-family-asian="Arial" style:font-family-complex="Arial" fo:font-size="12pt"/>
    </style:style>
    <style:style style:family="text" style:name="T1259">
      <style:text-properties fo:color="#1f1f1f" fo:font-family="Arial" style:font-family-asian="Arial" style:font-family-complex="Arial" fo:font-size="12pt"/>
    </style:style>
    <style:style style:parent-style-name="852" style:family="paragraph" style:name="P63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60">
      <style:text-properties fo:color="#1f1f1f" fo:font-family="Arial" style:font-family-asian="Arial" style:font-family-complex="Arial" fo:font-size="12pt" fo:font-weight="bold"/>
    </style:style>
    <style:style style:family="paragraph" style:name="P63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61">
      <style:text-properties fo:color="#1f1f1f" fo:font-family="Arial" style:font-family-asian="Arial" style:font-family-complex="Arial" fo:font-size="12pt"/>
    </style:style>
    <style:style style:family="text" style:name="T1262">
      <style:text-properties fo:color="#1f1f1f" fo:font-family="Arial" style:font-family-asian="Arial" style:font-family-complex="Arial" fo:font-size="12pt"/>
    </style:style>
    <style:style style:parent-style-name="852" style:family="paragraph" style:name="P63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63">
      <style:text-properties fo:color="#1f1f1f" fo:font-family="Arial" style:font-family-asian="Arial" style:font-family-complex="Arial" fo:font-size="12pt" fo:font-weight="bold"/>
    </style:style>
    <style:style style:family="paragraph" style:name="P63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64">
      <style:text-properties fo:color="#1f1f1f" fo:font-family="Arial" style:font-family-asian="Arial" style:font-family-complex="Arial" fo:font-size="12pt"/>
    </style:style>
    <style:style style:family="text" style:name="T1265">
      <style:text-properties fo:color="#1f1f1f" fo:font-family="Arial" style:font-family-asian="Arial" style:font-family-complex="Arial" fo:font-size="12pt"/>
    </style:style>
    <style:style style:parent-style-name="852" style:family="paragraph" style:name="P63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66">
      <style:text-properties fo:color="#1f1f1f" fo:font-family="Arial" style:font-family-asian="Arial" style:font-family-complex="Arial" fo:font-size="12pt" fo:font-weight="bold"/>
    </style:style>
    <style:style style:family="paragraph" style:name="P63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67">
      <style:text-properties fo:color="#1f1f1f" fo:font-family="Arial" style:font-family-asian="Arial" style:font-family-complex="Arial" fo:font-size="12pt"/>
    </style:style>
    <style:style style:family="text" style:name="T1268">
      <style:text-properties fo:color="#1f1f1f" fo:font-family="Arial" style:font-family-asian="Arial" style:font-family-complex="Arial" fo:font-size="12pt"/>
    </style:style>
    <style:style style:parent-style-name="851" style:family="paragraph" style:name="P63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69">
      <style:text-properties fo:color="#1f1f1f" fo:font-family="Arial" style:font-family-asian="Arial" style:font-family-complex="Arial" fo:font-size="14pt" fo:font-weight="bold"/>
    </style:style>
    <style:style style:parent-style-name="912" style:list-style-name="WWNum34" style:family="paragraph" style:name="P639">
      <style:paragraph-properties fo:line-height="115%" fo:margin-right="0cm" fo:margin-top="0pt" fo:margin-bottom="0pt" fo:border="none"/>
      <style:text-properties fo:font-family="Arial" style:font-family-asian="Arial" style:font-family-complex="Arial" fo:font-size="12pt"/>
    </style:style>
    <style:style style:family="text" style:name="T1270">
      <style:text-properties fo:color="#1f1f1f" fo:font-family="Arial" style:font-family-asian="Arial" style:font-family-complex="Arial" fo:font-size="12pt"/>
    </style:style>
    <style:style style:parent-style-name="912" style:list-style-name="WWNum34" style:family="paragraph" style:name="P640">
      <style:paragraph-properties fo:line-height="115%" fo:margin-right="0cm" fo:margin-top="0pt" fo:margin-bottom="0pt" fo:border="none"/>
      <style:text-properties fo:font-family="Arial" style:font-family-asian="Arial" style:font-family-complex="Arial" fo:font-size="12pt"/>
    </style:style>
    <style:style style:family="text" style:name="T1271">
      <style:text-properties fo:color="#1f1f1f" fo:font-family="Arial" style:font-family-asian="Arial" style:font-family-complex="Arial" fo:font-size="12pt"/>
    </style:style>
    <style:style style:parent-style-name="912" style:list-style-name="WWNum34" style:family="paragraph" style:name="P641">
      <style:paragraph-properties fo:line-height="115%" fo:margin-right="0cm" fo:margin-top="0pt" fo:margin-bottom="0pt" fo:border="none"/>
      <style:text-properties fo:font-family="Arial" style:font-family-asian="Arial" style:font-family-complex="Arial" fo:font-size="12pt"/>
    </style:style>
    <style:style style:family="text" style:name="T1272">
      <style:text-properties fo:color="#1f1f1f" fo:font-family="Arial" style:font-family-asian="Arial" style:font-family-complex="Arial" fo:font-size="12pt"/>
    </style:style>
    <style:style style:parent-style-name="912" style:list-style-name="WWNum34" style:family="paragraph" style:name="P642">
      <style:paragraph-properties fo:line-height="115%" fo:margin-right="0cm" fo:margin-top="0pt" fo:margin-bottom="0pt" fo:border="none"/>
      <style:text-properties fo:font-family="Arial" style:font-family-asian="Arial" style:font-family-complex="Arial" fo:font-size="12pt"/>
    </style:style>
    <style:style style:family="text" style:name="T1273">
      <style:text-properties fo:color="#1f1f1f" fo:font-family="Arial" style:font-family-asian="Arial" style:font-family-complex="Arial" fo:font-size="12pt"/>
    </style:style>
    <style:style style:family="paragraph" style:name="P643">
      <style:paragraph-properties/>
      <style:text-properties/>
    </style:style>
    <style:style style:family="paragraph" style:name="P644">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274">
      <style:text-properties fo:color="#1f1f1f" fo:font-family="Arial" style:font-family-asian="Arial" style:font-family-complex="Arial" fo:font-size="12pt"/>
    </style:style>
    <style:style style:parent-style-name="851" style:family="paragraph" style:name="P64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75">
      <style:text-properties fo:color="#1f1f1f" fo:font-family="Arial" style:font-family-asian="Arial" style:font-family-complex="Arial" fo:font-size="14pt" fo:font-weight="bold"/>
    </style:style>
    <style:style style:family="paragraph" style:name="P64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76">
      <style:text-properties fo:color="#1f1f1f" fo:font-family="Arial" style:font-family-asian="Arial" style:font-family-complex="Arial" fo:font-size="12pt"/>
    </style:style>
    <style:style style:parent-style-name="852" style:family="paragraph" style:name="P64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77">
      <style:text-properties fo:color="#1f1f1f" fo:font-family="Arial" style:font-family-asian="Arial" style:font-family-complex="Arial" fo:font-size="12pt" fo:font-weight="bold"/>
    </style:style>
    <style:style style:family="paragraph" style:name="P64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78">
      <style:text-properties fo:color="#1f1f1f" fo:font-family="Arial" style:font-family-asian="Arial" style:font-family-complex="Arial" fo:font-size="12pt"/>
    </style:style>
    <style:style style:parent-style-name="852" style:family="paragraph" style:name="P64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79">
      <style:text-properties fo:color="#1f1f1f" fo:font-family="Arial" style:font-family-asian="Arial" style:font-family-complex="Arial" fo:font-size="12pt" fo:font-weight="bold"/>
    </style:style>
    <style:style style:family="paragraph" style:name="P65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80">
      <style:text-properties fo:color="#1f1f1f" fo:font-family="Arial" style:font-family-asian="Arial" style:font-family-complex="Arial" fo:font-size="12pt"/>
    </style:style>
    <style:style style:parent-style-name="852" style:family="paragraph" style:name="P65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81">
      <style:text-properties fo:color="#1f1f1f" fo:font-family="Arial" style:font-family-asian="Arial" style:font-family-complex="Arial" fo:font-size="12pt" fo:font-weight="bold"/>
    </style:style>
    <style:style style:family="paragraph" style:name="P65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82">
      <style:text-properties fo:color="#1f1f1f" fo:font-family="Arial" style:font-family-asian="Arial" style:font-family-complex="Arial" fo:font-size="12pt"/>
    </style:style>
    <style:style style:parent-style-name="852" style:family="paragraph" style:name="P65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83">
      <style:text-properties fo:color="#1f1f1f" fo:font-family="Arial" style:font-family-asian="Arial" style:font-family-complex="Arial" fo:font-size="12pt" fo:font-weight="bold"/>
    </style:style>
    <style:style style:family="paragraph" style:name="P65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84">
      <style:text-properties fo:color="#1f1f1f" fo:font-family="Arial" style:font-family-asian="Arial" style:font-family-complex="Arial" fo:font-size="12pt"/>
    </style:style>
    <style:style style:parent-style-name="851" style:family="paragraph" style:name="P65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85">
      <style:text-properties fo:color="#1f1f1f" fo:font-family="Arial" style:font-family-asian="Arial" style:font-family-complex="Arial" fo:font-size="14pt" fo:font-weight="bold"/>
    </style:style>
    <style:style style:parent-style-name="912" style:list-style-name="WWNum35" style:family="paragraph" style:name="P656">
      <style:paragraph-properties fo:line-height="115%" fo:margin-right="0cm" fo:margin-top="0pt" fo:margin-bottom="0pt" fo:border="none"/>
      <style:text-properties fo:font-family="Arial" style:font-family-asian="Arial" style:font-family-complex="Arial" fo:font-size="12pt"/>
    </style:style>
    <style:style style:family="text" style:name="T1286">
      <style:text-properties fo:color="#1f1f1f" fo:font-family="Arial" style:font-family-asian="Arial" style:font-family-complex="Arial" fo:font-size="12pt"/>
    </style:style>
    <style:style style:parent-style-name="912" style:list-style-name="WWNum35" style:family="paragraph" style:name="P657">
      <style:paragraph-properties fo:line-height="115%" fo:margin-right="0cm" fo:margin-top="0pt" fo:margin-bottom="0pt" fo:border="none"/>
      <style:text-properties fo:font-family="Arial" style:font-family-asian="Arial" style:font-family-complex="Arial" fo:font-size="12pt"/>
    </style:style>
    <style:style style:family="text" style:name="T1287">
      <style:text-properties fo:color="#1f1f1f" fo:font-family="Arial" style:font-family-asian="Arial" style:font-family-complex="Arial" fo:font-size="12pt"/>
    </style:style>
    <style:style style:parent-style-name="912" style:list-style-name="WWNum35" style:family="paragraph" style:name="P658">
      <style:paragraph-properties fo:line-height="115%" fo:margin-right="0cm" fo:margin-top="0pt" fo:margin-bottom="0pt" fo:border="none"/>
      <style:text-properties fo:font-family="Arial" style:font-family-asian="Arial" style:font-family-complex="Arial" fo:font-size="12pt"/>
    </style:style>
    <style:style style:family="text" style:name="T1288">
      <style:text-properties fo:color="#1f1f1f" fo:font-family="Arial" style:font-family-asian="Arial" style:font-family-complex="Arial" fo:font-size="12pt"/>
    </style:style>
    <style:style style:parent-style-name="912" style:list-style-name="WWNum35" style:family="paragraph" style:name="P659">
      <style:paragraph-properties fo:line-height="115%" fo:margin-right="0cm" fo:margin-top="0pt" fo:margin-bottom="0pt" fo:border="none"/>
      <style:text-properties fo:font-family="Arial" style:font-family-asian="Arial" style:font-family-complex="Arial" fo:font-size="12pt"/>
    </style:style>
    <style:style style:family="text" style:name="T1289">
      <style:text-properties fo:color="#1f1f1f" fo:font-family="Arial" style:font-family-asian="Arial" style:font-family-complex="Arial" fo:font-size="12pt"/>
    </style:style>
    <style:style style:family="paragraph" style:name="P660">
      <style:paragraph-properties/>
      <style:text-properties/>
    </style:style>
    <style:style style:family="paragraph" style:name="P661">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290">
      <style:text-properties fo:color="#1f1f1f" fo:font-family="Arial" style:font-family-asian="Arial" style:font-family-complex="Arial" fo:font-size="12pt"/>
    </style:style>
    <style:style style:parent-style-name="851" style:family="paragraph" style:name="P66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91">
      <style:text-properties fo:color="#1f1f1f" fo:font-family="Arial" style:font-family-asian="Arial" style:font-family-complex="Arial" fo:font-size="14pt" fo:font-weight="bold"/>
    </style:style>
    <style:style style:family="paragraph" style:name="P66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92">
      <style:text-properties fo:color="#1f1f1f" fo:font-family="Arial" style:font-family-asian="Arial" style:font-family-complex="Arial" fo:font-size="12pt"/>
    </style:style>
    <style:style style:parent-style-name="852" style:family="paragraph" style:name="P66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93">
      <style:text-properties fo:color="#1f1f1f" fo:font-family="Arial" style:font-family-asian="Arial" style:font-family-complex="Arial" fo:font-size="12pt" fo:font-weight="bold"/>
    </style:style>
    <style:style style:family="paragraph" style:name="P66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94">
      <style:text-properties fo:color="#1f1f1f" fo:font-family="Arial" style:font-family-asian="Arial" style:font-family-complex="Arial" fo:font-size="12pt"/>
    </style:style>
    <style:style style:parent-style-name="852" style:family="paragraph" style:name="P66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95">
      <style:text-properties fo:color="#1f1f1f" fo:font-family="Arial" style:font-family-asian="Arial" style:font-family-complex="Arial" fo:font-size="12pt" fo:font-weight="bold"/>
    </style:style>
    <style:style style:family="paragraph" style:name="P66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96">
      <style:text-properties fo:color="#1f1f1f" fo:font-family="Arial" style:font-family-asian="Arial" style:font-family-complex="Arial" fo:font-size="12pt"/>
    </style:style>
    <style:style style:parent-style-name="852" style:family="paragraph" style:name="P66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97">
      <style:text-properties fo:color="#1f1f1f" fo:font-family="Arial" style:font-family-asian="Arial" style:font-family-complex="Arial" fo:font-size="12pt" fo:font-weight="bold"/>
    </style:style>
    <style:style style:family="paragraph" style:name="P66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298">
      <style:text-properties fo:color="#1f1f1f" fo:font-family="Arial" style:font-family-asian="Arial" style:font-family-complex="Arial" fo:font-size="12pt"/>
    </style:style>
    <style:style style:parent-style-name="852" style:family="paragraph" style:name="P67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299">
      <style:text-properties fo:color="#1f1f1f" fo:font-family="Arial" style:font-family-asian="Arial" style:font-family-complex="Arial" fo:font-size="12pt" fo:font-weight="bold"/>
    </style:style>
    <style:style style:family="paragraph" style:name="P67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00">
      <style:text-properties fo:color="#1f1f1f" fo:font-family="Arial" style:font-family-asian="Arial" style:font-family-complex="Arial" fo:font-size="12pt"/>
    </style:style>
    <style:style style:parent-style-name="851" style:family="paragraph" style:name="P67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01">
      <style:text-properties fo:color="#1f1f1f" fo:font-family="Arial" style:font-family-asian="Arial" style:font-family-complex="Arial" fo:font-size="14pt" fo:font-weight="bold"/>
    </style:style>
    <style:style style:parent-style-name="912" style:list-style-name="WWNum36" style:family="paragraph" style:name="P673">
      <style:paragraph-properties fo:line-height="115%" fo:margin-right="0cm" fo:margin-top="0pt" fo:margin-bottom="0pt" fo:border="none"/>
      <style:text-properties fo:font-family="Arial" style:font-family-asian="Arial" style:font-family-complex="Arial" fo:font-size="12pt"/>
    </style:style>
    <style:style style:family="text" style:name="T1302">
      <style:text-properties fo:color="#1f1f1f" fo:font-family="Arial" style:font-family-asian="Arial" style:font-family-complex="Arial" fo:font-size="12pt"/>
    </style:style>
    <style:style style:parent-style-name="912" style:list-style-name="WWNum36" style:family="paragraph" style:name="P674">
      <style:paragraph-properties fo:line-height="115%" fo:margin-right="0cm" fo:margin-top="0pt" fo:margin-bottom="0pt" fo:border="none"/>
      <style:text-properties fo:font-family="Arial" style:font-family-asian="Arial" style:font-family-complex="Arial" fo:font-size="12pt"/>
    </style:style>
    <style:style style:family="text" style:name="T1303">
      <style:text-properties fo:color="#1f1f1f" fo:font-family="Arial" style:font-family-asian="Arial" style:font-family-complex="Arial" fo:font-size="12pt"/>
    </style:style>
    <style:style style:parent-style-name="912" style:list-style-name="WWNum36" style:family="paragraph" style:name="P675">
      <style:paragraph-properties fo:line-height="115%" fo:margin-right="0cm" fo:margin-top="0pt" fo:margin-bottom="0pt" fo:border="none"/>
      <style:text-properties fo:font-family="Arial" style:font-family-asian="Arial" style:font-family-complex="Arial" fo:font-size="12pt"/>
    </style:style>
    <style:style style:family="text" style:name="T1304">
      <style:text-properties fo:color="#1f1f1f" fo:font-family="Arial" style:font-family-asian="Arial" style:font-family-complex="Arial" fo:font-size="12pt"/>
    </style:style>
    <style:style style:parent-style-name="912" style:list-style-name="WWNum36" style:family="paragraph" style:name="P676">
      <style:paragraph-properties fo:line-height="115%" fo:margin-right="0cm" fo:margin-top="0pt" fo:margin-bottom="0pt" fo:border="none"/>
      <style:text-properties fo:font-family="Arial" style:font-family-asian="Arial" style:font-family-complex="Arial" fo:font-size="12pt"/>
    </style:style>
    <style:style style:family="text" style:name="T1305">
      <style:text-properties fo:color="#1f1f1f" fo:font-family="Arial" style:font-family-asian="Arial" style:font-family-complex="Arial" fo:font-size="12pt"/>
    </style:style>
    <style:style style:family="paragraph" style:name="P677">
      <style:paragraph-properties/>
      <style:text-properties/>
    </style:style>
    <style:style style:family="paragraph" style:name="P678">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306">
      <style:text-properties fo:color="#1f1f1f" fo:font-family="Arial" style:font-family-asian="Arial" style:font-family-complex="Arial" fo:font-size="12pt"/>
    </style:style>
    <style:style style:parent-style-name="851" style:family="paragraph" style:name="P67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07">
      <style:text-properties fo:color="#1f1f1f" fo:font-family="Arial" style:font-family-asian="Arial" style:font-family-complex="Arial" fo:font-size="14pt" fo:font-weight="bold"/>
    </style:style>
    <style:style style:family="paragraph" style:name="P68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08">
      <style:text-properties fo:color="#1f1f1f" fo:font-family="Arial" style:font-family-asian="Arial" style:font-family-complex="Arial" fo:font-size="12pt"/>
    </style:style>
    <style:style style:family="paragraph" style:name="P68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09">
      <style:text-properties fo:color="#1f1f1f" fo:font-family="Arial" style:font-family-asian="Arial" style:font-family-complex="Arial" fo:font-size="12pt"/>
    </style:style>
    <style:style style:family="paragraph" style:name="P68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10">
      <style:text-properties fo:color="#1f1f1f" fo:font-family="Arial" style:font-family-asian="Arial" style:font-family-complex="Arial" fo:font-size="12pt"/>
    </style:style>
    <style:style style:family="paragraph" style:name="P68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11">
      <style:text-properties fo:color="#1f1f1f" fo:font-family="Arial" style:font-family-asian="Arial" style:font-family-complex="Arial" fo:font-size="12pt"/>
    </style:style>
    <style:style style:family="paragraph" style:name="P68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12">
      <style:text-properties fo:color="#1f1f1f" fo:font-family="Arial" style:font-family-asian="Arial" style:font-family-complex="Arial" fo:font-size="12pt"/>
    </style:style>
    <style:style style:parent-style-name="851" style:family="paragraph" style:name="P68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13">
      <style:text-properties fo:color="#1f1f1f" fo:font-family="Arial" style:font-family-asian="Arial" style:font-family-complex="Arial" fo:font-size="14pt" fo:font-weight="bold"/>
    </style:style>
    <style:style style:parent-style-name="912" style:list-style-name="WWNum37" style:family="paragraph" style:name="P686">
      <style:paragraph-properties fo:line-height="115%" fo:margin-right="0cm" fo:margin-top="0pt" fo:margin-bottom="0pt" fo:border="none"/>
      <style:text-properties fo:font-family="Arial" style:font-family-asian="Arial" style:font-family-complex="Arial" fo:font-size="12pt"/>
    </style:style>
    <style:style style:family="text" style:name="T1314">
      <style:text-properties fo:color="#1f1f1f" fo:font-family="Arial" style:font-family-asian="Arial" style:font-family-complex="Arial" fo:font-size="12pt"/>
    </style:style>
    <style:style style:parent-style-name="912" style:list-style-name="WWNum37" style:family="paragraph" style:name="P687">
      <style:paragraph-properties fo:line-height="115%" fo:margin-right="0cm" fo:margin-top="0pt" fo:margin-bottom="0pt" fo:border="none"/>
      <style:text-properties fo:font-family="Arial" style:font-family-asian="Arial" style:font-family-complex="Arial" fo:font-size="12pt"/>
    </style:style>
    <style:style style:family="text" style:name="T1315">
      <style:text-properties fo:color="#1f1f1f" fo:font-family="Arial" style:font-family-asian="Arial" style:font-family-complex="Arial" fo:font-size="12pt"/>
    </style:style>
    <style:style style:parent-style-name="912" style:list-style-name="WWNum37" style:family="paragraph" style:name="P688">
      <style:paragraph-properties fo:line-height="115%" fo:margin-right="0cm" fo:margin-top="0pt" fo:margin-bottom="0pt" fo:border="none"/>
      <style:text-properties fo:font-family="Arial" style:font-family-asian="Arial" style:font-family-complex="Arial" fo:font-size="12pt"/>
    </style:style>
    <style:style style:family="text" style:name="T1316">
      <style:text-properties fo:color="#1f1f1f" fo:font-family="Arial" style:font-family-asian="Arial" style:font-family-complex="Arial" fo:font-size="12pt"/>
    </style:style>
    <style:style style:parent-style-name="912" style:list-style-name="WWNum37" style:family="paragraph" style:name="P689">
      <style:paragraph-properties fo:line-height="115%" fo:margin-right="0cm" fo:margin-top="0pt" fo:margin-bottom="0pt" fo:border="none"/>
      <style:text-properties fo:font-family="Arial" style:font-family-asian="Arial" style:font-family-complex="Arial" fo:font-size="12pt"/>
    </style:style>
    <style:style style:family="text" style:name="T1317">
      <style:text-properties fo:color="#1f1f1f" fo:font-family="Arial" style:font-family-asian="Arial" style:font-family-complex="Arial" fo:font-size="12pt"/>
    </style:style>
    <style:style style:family="paragraph" style:name="P690">
      <style:paragraph-properties/>
      <style:text-properties/>
    </style:style>
    <style:style style:family="paragraph" style:name="P691">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318">
      <style:text-properties fo:color="#1f1f1f" fo:font-family="Arial" style:font-family-asian="Arial" style:font-family-complex="Arial" fo:font-size="12pt"/>
    </style:style>
    <style:style style:parent-style-name="851" style:family="paragraph" style:name="P69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19">
      <style:text-properties fo:color="#1f1f1f" fo:font-family="Arial" style:font-family-asian="Arial" style:font-family-complex="Arial" fo:font-size="14pt" fo:font-weight="bold"/>
    </style:style>
    <style:style style:family="paragraph" style:name="P69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20">
      <style:text-properties fo:color="#1f1f1f" fo:font-family="Arial" style:font-family-asian="Arial" style:font-family-complex="Arial" fo:font-size="12pt"/>
    </style:style>
    <style:style style:parent-style-name="852" style:family="paragraph" style:name="P69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21">
      <style:text-properties fo:color="#1f1f1f" fo:font-family="Arial" style:font-family-asian="Arial" style:font-family-complex="Arial" fo:font-size="12pt" fo:font-weight="bold"/>
    </style:style>
    <style:style style:family="paragraph" style:name="P69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22">
      <style:text-properties fo:color="#1f1f1f" fo:font-family="Arial" style:font-family-asian="Arial" style:font-family-complex="Arial" fo:font-size="12pt"/>
    </style:style>
    <style:style style:parent-style-name="852" style:family="paragraph" style:name="P69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23">
      <style:text-properties fo:color="#1f1f1f" fo:font-family="Arial" style:font-family-asian="Arial" style:font-family-complex="Arial" fo:font-size="12pt" fo:font-weight="bold"/>
    </style:style>
    <style:style style:family="paragraph" style:name="P69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24">
      <style:text-properties fo:color="#1f1f1f" fo:font-family="Arial" style:font-family-asian="Arial" style:font-family-complex="Arial" fo:font-size="12pt"/>
    </style:style>
    <style:style style:parent-style-name="852" style:family="paragraph" style:name="P69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25">
      <style:text-properties fo:color="#1f1f1f" fo:font-family="Arial" style:font-family-asian="Arial" style:font-family-complex="Arial" fo:font-size="12pt" fo:font-weight="bold"/>
    </style:style>
    <style:style style:family="paragraph" style:name="P69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26">
      <style:text-properties fo:color="#1f1f1f" fo:font-family="Arial" style:font-family-asian="Arial" style:font-family-complex="Arial" fo:font-size="12pt"/>
    </style:style>
    <style:style style:family="table" style:name="ta5">
      <style:paragraph-properties fo:line-height="100%" fo:margin-bottom="0pt"/>
      <style:table-properties style:width="6.276cm" fo:margin-left="0cm" table:align="left" style:use-optimal-column-width="true"/>
    </style:style>
    <style:style style:family="table-column" style:name="co12">
      <style:table-column-properties style:column-width="1.157cm" style:use-optimal-column-width="true"/>
    </style:style>
    <style:style style:family="table-column" style:name="co13">
      <style:table-column-properties style:column-width="2.56cm" style:use-optimal-column-width="true"/>
    </style:style>
    <style:style style:family="table-column" style:name="co14">
      <style:table-column-properties style:column-width="2.56cm" style:use-optimal-column-width="true"/>
    </style:style>
    <style:style style:family="table-row" style:name="ro16">
      <style:table-row-properties/>
    </style:style>
    <style:style style:family="table-cell" style:name="ce4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0">
      <style:paragraph-properties style:line-height-at-least="12pt" fo:margin-top="0pt" fo:margin-bottom="0pt"/>
      <style:text-properties/>
    </style:style>
    <style:style style:family="text" style:name="T1327">
      <style:text-properties fo:color="#1f1f1f" fo:font-family="Arial" style:font-family-asian="Arial" style:font-family-complex="Arial" fo:font-size="12pt" fo:font-weight="bold"/>
    </style:style>
    <style:style style:family="table-cell" style:name="ce4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1">
      <style:paragraph-properties style:line-height-at-least="12pt" fo:margin-top="0pt" fo:margin-bottom="0pt"/>
      <style:text-properties/>
    </style:style>
    <style:style style:family="text" style:name="T1328">
      <style:text-properties fo:color="#1f1f1f" fo:font-family="Arial" style:font-family-asian="Arial" style:font-family-complex="Arial" fo:font-size="12pt" fo:font-weight="bold"/>
    </style:style>
    <style:style style:family="table-cell" style:name="ce4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2">
      <style:paragraph-properties style:line-height-at-least="12pt" fo:margin-top="0pt" fo:margin-bottom="0pt"/>
      <style:text-properties/>
    </style:style>
    <style:style style:family="text" style:name="T1329">
      <style:text-properties fo:color="#1f1f1f" fo:font-family="Arial" style:font-family-asian="Arial" style:font-family-complex="Arial" fo:font-size="12pt" fo:font-weight="bold"/>
    </style:style>
    <style:style style:family="table-row" style:name="ro17">
      <style:table-row-properties/>
    </style:style>
    <style:style style:family="table-cell" style:name="ce5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3">
      <style:paragraph-properties style:line-height-at-least="12pt" fo:margin-top="0pt" fo:margin-bottom="0pt"/>
      <style:text-properties/>
    </style:style>
    <style:style style:family="text" style:name="T1330">
      <style:text-properties fo:color="#1f1f1f" fo:font-family="Arial" style:font-family-asian="Arial" style:font-family-complex="Arial" fo:font-size="12pt"/>
    </style:style>
    <style:style style:family="table-cell" style:name="ce5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4">
      <style:paragraph-properties style:line-height-at-least="12pt" fo:margin-top="0pt" fo:margin-bottom="0pt"/>
      <style:text-properties/>
    </style:style>
    <style:style style:family="text" style:name="T1331">
      <style:text-properties fo:color="#1f1f1f" fo:font-family="Arial" style:font-family-asian="Arial" style:font-family-complex="Arial" fo:font-size="12pt"/>
    </style:style>
    <style:style style:family="table-cell" style:name="ce5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5">
      <style:paragraph-properties style:line-height-at-least="12pt" fo:margin-top="0pt" fo:margin-bottom="0pt"/>
      <style:text-properties/>
    </style:style>
    <style:style style:family="text" style:name="T1332">
      <style:text-properties fo:color="#1f1f1f" fo:font-family="Arial" style:font-family-asian="Arial" style:font-family-complex="Arial" fo:font-size="12pt"/>
    </style:style>
    <style:style style:family="table-row" style:name="ro18">
      <style:table-row-properties/>
    </style:style>
    <style:style style:family="table-cell" style:name="ce5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6">
      <style:paragraph-properties style:line-height-at-least="12pt" fo:margin-top="0pt" fo:margin-bottom="0pt"/>
      <style:text-properties/>
    </style:style>
    <style:style style:family="text" style:name="T1333">
      <style:text-properties fo:color="#1f1f1f" fo:font-family="Arial" style:font-family-asian="Arial" style:font-family-complex="Arial" fo:font-size="12pt"/>
    </style:style>
    <style:style style:family="table-cell" style:name="ce5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7">
      <style:paragraph-properties style:line-height-at-least="12pt" fo:margin-top="0pt" fo:margin-bottom="0pt"/>
      <style:text-properties/>
    </style:style>
    <style:style style:family="text" style:name="T1334">
      <style:text-properties fo:color="#1f1f1f" fo:font-family="Arial" style:font-family-asian="Arial" style:font-family-complex="Arial" fo:font-size="12pt"/>
    </style:style>
    <style:style style:family="table-cell" style:name="ce5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8">
      <style:paragraph-properties style:line-height-at-least="12pt" fo:margin-top="0pt" fo:margin-bottom="0pt"/>
      <style:text-properties/>
    </style:style>
    <style:style style:family="text" style:name="T1335">
      <style:text-properties fo:color="#1f1f1f" fo:font-family="Arial" style:font-family-asian="Arial" style:font-family-complex="Arial" fo:font-size="12pt"/>
    </style:style>
    <style:style style:parent-style-name="852" style:family="paragraph" style:name="P70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36">
      <style:text-properties fo:color="#1f1f1f" fo:font-family="Arial" style:font-family-asian="Arial" style:font-family-complex="Arial" fo:font-size="12pt" fo:font-weight="bold"/>
    </style:style>
    <style:style style:family="paragraph" style:name="P71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37">
      <style:text-properties fo:color="#1f1f1f" fo:font-family="Arial" style:font-family-asian="Arial" style:font-family-complex="Arial" fo:font-size="12pt"/>
    </style:style>
    <style:style style:parent-style-name="851" style:family="paragraph" style:name="P71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38">
      <style:text-properties fo:color="#1f1f1f" fo:font-family="Arial" style:font-family-asian="Arial" style:font-family-complex="Arial" fo:font-size="14pt" fo:font-weight="bold"/>
    </style:style>
    <style:style style:parent-style-name="912" style:list-style-name="WWNum38" style:family="paragraph" style:name="P712">
      <style:paragraph-properties fo:line-height="115%" fo:margin-right="0cm" fo:margin-top="0pt" fo:margin-bottom="0pt" fo:border="none"/>
      <style:text-properties fo:font-family="Arial" style:font-family-asian="Arial" style:font-family-complex="Arial" fo:font-size="12pt"/>
    </style:style>
    <style:style style:family="text" style:name="T1339">
      <style:text-properties fo:color="#1f1f1f" fo:font-family="Arial" style:font-family-asian="Arial" style:font-family-complex="Arial" fo:font-size="12pt"/>
    </style:style>
    <style:style style:parent-style-name="912" style:list-style-name="WWNum38" style:family="paragraph" style:name="P713">
      <style:paragraph-properties fo:line-height="115%" fo:margin-right="0cm" fo:margin-top="0pt" fo:margin-bottom="0pt" fo:border="none"/>
      <style:text-properties fo:font-family="Arial" style:font-family-asian="Arial" style:font-family-complex="Arial" fo:font-size="12pt"/>
    </style:style>
    <style:style style:family="text" style:name="T1340">
      <style:text-properties fo:color="#1f1f1f" fo:font-family="Arial" style:font-family-asian="Arial" style:font-family-complex="Arial" fo:font-size="12pt"/>
    </style:style>
    <style:style style:parent-style-name="912" style:list-style-name="WWNum38" style:family="paragraph" style:name="P714">
      <style:paragraph-properties fo:line-height="115%" fo:margin-right="0cm" fo:margin-top="0pt" fo:margin-bottom="0pt" fo:border="none"/>
      <style:text-properties fo:font-family="Arial" style:font-family-asian="Arial" style:font-family-complex="Arial" fo:font-size="12pt"/>
    </style:style>
    <style:style style:family="text" style:name="T1341">
      <style:text-properties fo:color="#1f1f1f" fo:font-family="Arial" style:font-family-asian="Arial" style:font-family-complex="Arial" fo:font-size="12pt"/>
    </style:style>
    <style:style style:parent-style-name="912" style:list-style-name="WWNum38" style:family="paragraph" style:name="P715">
      <style:paragraph-properties fo:line-height="115%" fo:margin-right="0cm" fo:margin-top="0pt" fo:margin-bottom="0pt" fo:border="none"/>
      <style:text-properties fo:font-family="Arial" style:font-family-asian="Arial" style:font-family-complex="Arial" fo:font-size="12pt"/>
    </style:style>
    <style:style style:family="text" style:name="T1342">
      <style:text-properties fo:color="#1f1f1f" fo:font-family="Arial" style:font-family-asian="Arial" style:font-family-complex="Arial" fo:font-size="12pt"/>
    </style:style>
    <style:style style:family="paragraph" style:name="P716">
      <style:paragraph-properties/>
      <style:text-properties/>
    </style:style>
    <style:style style:parent-style-name="851" style:family="paragraph" style:name="P71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343">
      <style:text-properties fo:color="#1f1f1f" fo:font-family="Arial" style:font-family-asian="Arial" style:font-family-complex="Arial" fo:font-size="14pt" fo:font-weight="bold"/>
    </style:style>
    <style:style style:family="paragraph" style:name="P71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44">
      <style:text-properties fo:color="#1f1f1f" fo:font-family="Arial" style:font-family-asian="Arial" style:font-family-complex="Arial" fo:font-size="12pt"/>
    </style:style>
    <style:style style:family="paragraph" style:name="P7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45">
      <style:text-properties fo:color="#1f1f1f" fo:font-family="Arial" style:font-family-asian="Arial" style:font-family-complex="Arial" fo:font-size="12pt"/>
    </style:style>
    <style:style style:family="paragraph" style:name="P72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46">
      <style:text-properties fo:color="#1f1f1f" fo:font-family="Arial" style:font-family-asian="Arial" style:font-family-complex="Arial" fo:font-size="12pt"/>
    </style:style>
    <style:style style:family="paragraph" style:name="P7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47">
      <style:text-properties fo:color="#1f1f1f" fo:font-family="Arial" style:font-family-asian="Arial" style:font-family-complex="Arial" fo:font-size="12pt"/>
    </style:style>
    <style:style style:family="paragraph" style:name="P72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48">
      <style:text-properties fo:color="#1f1f1f" fo:font-family="Arial" style:font-family-asian="Arial" style:font-family-complex="Arial" fo:font-size="12pt"/>
    </style:style>
    <style:style style:parent-style-name="851" style:family="paragraph" style:name="P72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49">
      <style:text-properties fo:color="#1f1f1f" fo:font-family="Arial" style:font-family-asian="Arial" style:font-family-complex="Arial" fo:font-size="14pt" fo:font-weight="bold"/>
    </style:style>
    <style:style style:parent-style-name="912" style:list-style-name="WWNum39" style:family="paragraph" style:name="P724">
      <style:paragraph-properties fo:line-height="115%" fo:margin-right="0cm" fo:margin-top="0pt" fo:margin-bottom="0pt" fo:border="none"/>
      <style:text-properties fo:font-family="Arial" style:font-family-asian="Arial" style:font-family-complex="Arial" fo:font-size="12pt"/>
    </style:style>
    <style:style style:family="text" style:name="T1350">
      <style:text-properties fo:color="#1f1f1f" fo:font-family="Arial" style:font-family-asian="Arial" style:font-family-complex="Arial" fo:font-size="12pt"/>
    </style:style>
    <style:style style:parent-style-name="912" style:list-style-name="WWNum39" style:family="paragraph" style:name="P725">
      <style:paragraph-properties fo:line-height="115%" fo:margin-right="0cm" fo:margin-top="0pt" fo:margin-bottom="0pt" fo:border="none"/>
      <style:text-properties fo:font-family="Arial" style:font-family-asian="Arial" style:font-family-complex="Arial" fo:font-size="12pt"/>
    </style:style>
    <style:style style:family="text" style:name="T1351">
      <style:text-properties fo:color="#1f1f1f" fo:font-family="Arial" style:font-family-asian="Arial" style:font-family-complex="Arial" fo:font-size="12pt"/>
    </style:style>
    <style:style style:parent-style-name="912" style:list-style-name="WWNum39" style:family="paragraph" style:name="P726">
      <style:paragraph-properties fo:line-height="115%" fo:margin-right="0cm" fo:margin-top="0pt" fo:margin-bottom="0pt" fo:border="none"/>
      <style:text-properties fo:font-family="Arial" style:font-family-asian="Arial" style:font-family-complex="Arial" fo:font-size="12pt"/>
    </style:style>
    <style:style style:family="text" style:name="T1352">
      <style:text-properties fo:color="#1f1f1f" fo:font-family="Arial" style:font-family-asian="Arial" style:font-family-complex="Arial" fo:font-size="12pt"/>
    </style:style>
    <style:style style:parent-style-name="912" style:list-style-name="WWNum39" style:family="paragraph" style:name="P727">
      <style:paragraph-properties fo:line-height="115%" fo:margin-right="0cm" fo:margin-top="0pt" fo:margin-bottom="0pt" fo:border="none"/>
      <style:text-properties fo:font-family="Arial" style:font-family-asian="Arial" style:font-family-complex="Arial" fo:font-size="12pt"/>
    </style:style>
    <style:style style:family="text" style:name="T1353">
      <style:text-properties fo:color="#1f1f1f" fo:font-family="Arial" style:font-family-asian="Arial" style:font-family-complex="Arial" fo:font-size="12pt"/>
    </style:style>
    <style:style style:family="paragraph" style:name="P728">
      <style:paragraph-properties/>
      <style:text-properties/>
    </style:style>
    <style:style style:family="paragraph" style:name="P729">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354">
      <style:text-properties fo:color="#1f1f1f" fo:font-family="Arial" style:font-family-asian="Arial" style:font-family-complex="Arial" fo:font-size="12pt"/>
    </style:style>
    <style:style style:parent-style-name="851" style:family="paragraph" style:name="P73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55">
      <style:text-properties fo:color="#1f1f1f" fo:font-family="Arial" style:font-family-asian="Arial" style:font-family-complex="Arial" fo:font-size="14pt" fo:font-weight="bold"/>
    </style:style>
    <style:style style:family="paragraph" style:name="P73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56">
      <style:text-properties fo:color="#1f1f1f" fo:font-family="Arial" style:font-family-asian="Arial" style:font-family-complex="Arial" fo:font-size="12pt"/>
    </style:style>
    <style:style style:parent-style-name="852" style:family="paragraph" style:name="P73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57">
      <style:text-properties fo:color="#1f1f1f" fo:font-family="Arial" style:font-family-asian="Arial" style:font-family-complex="Arial" fo:font-size="12pt" fo:font-weight="bold"/>
    </style:style>
    <style:style style:family="paragraph" style:name="P73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58">
      <style:text-properties fo:color="#1f1f1f" fo:font-family="Arial" style:font-family-asian="Arial" style:font-family-complex="Arial" fo:font-size="12pt"/>
    </style:style>
    <style:style style:parent-style-name="852" style:family="paragraph" style:name="P73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59">
      <style:text-properties fo:color="#1f1f1f" fo:font-family="Arial" style:font-family-asian="Arial" style:font-family-complex="Arial" fo:font-size="12pt" fo:font-weight="bold"/>
    </style:style>
    <style:style style:family="paragraph" style:name="P73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60">
      <style:text-properties fo:color="#1f1f1f" fo:font-family="Arial" style:font-family-asian="Arial" style:font-family-complex="Arial" fo:font-size="12pt"/>
    </style:style>
    <style:style style:parent-style-name="912" style:list-style-name="WWNum40" style:family="paragraph" style:name="P736">
      <style:paragraph-properties fo:line-height="115%" fo:margin-right="0cm" fo:margin-top="0pt" fo:margin-bottom="0pt" fo:border="none"/>
      <style:text-properties fo:font-family="Arial" style:font-family-asian="Arial" style:font-family-complex="Arial" fo:font-size="12pt"/>
    </style:style>
    <style:style style:family="text" style:name="T1361">
      <style:text-properties fo:color="#1f1f1f" fo:font-family="Arial" style:font-family-asian="Arial" style:font-family-complex="Arial" fo:font-size="12pt"/>
    </style:style>
    <style:style style:parent-style-name="912" style:list-style-name="WWNum40" style:family="paragraph" style:name="P737">
      <style:paragraph-properties fo:line-height="115%" fo:margin-right="0cm" fo:margin-top="0pt" fo:margin-bottom="0pt" fo:border="none"/>
      <style:text-properties fo:font-family="Arial" style:font-family-asian="Arial" style:font-family-complex="Arial" fo:font-size="12pt"/>
    </style:style>
    <style:style style:family="text" style:name="T1362">
      <style:text-properties fo:color="#1f1f1f" fo:font-family="Arial" style:font-family-asian="Arial" style:font-family-complex="Arial" fo:font-size="12pt"/>
    </style:style>
    <style:style style:parent-style-name="912" style:list-style-name="WWNum40" style:family="paragraph" style:name="P738">
      <style:paragraph-properties fo:line-height="115%" fo:margin-right="0cm" fo:margin-top="0pt" fo:margin-bottom="0pt" fo:border="none"/>
      <style:text-properties fo:font-family="Arial" style:font-family-asian="Arial" style:font-family-complex="Arial" fo:font-size="12pt"/>
    </style:style>
    <style:style style:family="text" style:name="T1363">
      <style:text-properties fo:color="#1f1f1f" fo:font-family="Arial" style:font-family-asian="Arial" style:font-family-complex="Arial" fo:font-size="12pt"/>
    </style:style>
    <style:style style:parent-style-name="852" style:family="paragraph" style:name="P7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64">
      <style:text-properties fo:color="#1f1f1f" fo:font-family="Arial" style:font-family-asian="Arial" style:font-family-complex="Arial" fo:font-size="12pt" fo:font-weight="bold"/>
    </style:style>
    <style:style style:family="paragraph" style:name="P7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65">
      <style:text-properties fo:color="#1f1f1f" fo:font-family="Arial" style:font-family-asian="Arial" style:font-family-complex="Arial" fo:font-size="12pt"/>
    </style:style>
    <style:style style:family="table" style:name="ta6">
      <style:paragraph-properties fo:line-height="100%" fo:margin-bottom="0pt"/>
      <style:table-properties style:width="11.45cm" fo:margin-left="0cm" table:align="left" style:use-optimal-column-width="true"/>
    </style:style>
    <style:style style:family="table-column" style:name="co15">
      <style:table-column-properties style:column-width="2.134cm" style:use-optimal-column-width="true"/>
    </style:style>
    <style:style style:family="table-column" style:name="co16">
      <style:table-column-properties style:column-width="4.766cm" style:use-optimal-column-width="true"/>
    </style:style>
    <style:style style:family="table-column" style:name="co17">
      <style:table-column-properties style:column-width="4.546cm" style:use-optimal-column-width="true"/>
    </style:style>
    <style:style style:family="table-row" style:name="ro19">
      <style:table-row-properties/>
    </style:style>
    <style:style style:family="table-cell" style:name="ce5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1">
      <style:paragraph-properties style:line-height-at-least="12pt" fo:margin-top="0pt" fo:margin-bottom="0pt"/>
      <style:text-properties/>
    </style:style>
    <style:style style:family="text" style:name="T1366">
      <style:text-properties fo:color="#1f1f1f" fo:font-family="Arial" style:font-family-asian="Arial" style:font-family-complex="Arial" fo:font-size="12pt" fo:font-weight="bold"/>
    </style:style>
    <style:style style:family="table-cell" style:name="ce5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2">
      <style:paragraph-properties style:line-height-at-least="12pt" fo:margin-top="0pt" fo:margin-bottom="0pt"/>
      <style:text-properties/>
    </style:style>
    <style:style style:family="text" style:name="T1367">
      <style:text-properties fo:color="#1f1f1f" fo:font-family="Arial" style:font-family-asian="Arial" style:font-family-complex="Arial" fo:font-size="12pt" fo:font-weight="bold"/>
    </style:style>
    <style:style style:family="table-cell" style:name="ce5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3">
      <style:paragraph-properties style:line-height-at-least="12pt" fo:margin-top="0pt" fo:margin-bottom="0pt"/>
      <style:text-properties/>
    </style:style>
    <style:style style:family="text" style:name="T1368">
      <style:text-properties fo:color="#1f1f1f" fo:font-family="Arial" style:font-family-asian="Arial" style:font-family-complex="Arial" fo:font-size="12pt" fo:font-weight="bold"/>
    </style:style>
    <style:style style:family="table-row" style:name="ro20">
      <style:table-row-properties/>
    </style:style>
    <style:style style:family="table-cell" style:name="ce6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4">
      <style:paragraph-properties style:line-height-at-least="12pt" fo:margin-top="0pt" fo:margin-bottom="0pt"/>
      <style:text-properties/>
    </style:style>
    <style:style style:family="text" style:name="T1369">
      <style:text-properties fo:color="#1f1f1f" fo:font-family="Arial" style:font-family-asian="Arial" style:font-family-complex="Arial" fo:font-size="12pt"/>
    </style:style>
    <style:style style:family="table-cell" style:name="ce6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5">
      <style:paragraph-properties style:line-height-at-least="12pt" fo:margin-top="0pt" fo:margin-bottom="0pt"/>
      <style:text-properties/>
    </style:style>
    <style:style style:family="text" style:name="T1370">
      <style:text-properties fo:color="#1f1f1f" fo:font-family="Arial" style:font-family-asian="Arial" style:font-family-complex="Arial" fo:font-size="12pt"/>
    </style:style>
    <style:style style:family="table-cell" style:name="ce6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6">
      <style:paragraph-properties style:line-height-at-least="12pt" fo:margin-top="0pt" fo:margin-bottom="0pt"/>
      <style:text-properties/>
    </style:style>
    <style:style style:family="text" style:name="T1371">
      <style:text-properties fo:color="#1f1f1f" fo:font-family="Arial" style:font-family-asian="Arial" style:font-family-complex="Arial" fo:font-size="12pt"/>
    </style:style>
    <style:style style:family="table-row" style:name="ro21">
      <style:table-row-properties/>
    </style:style>
    <style:style style:family="table-cell" style:name="ce6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7">
      <style:paragraph-properties style:line-height-at-least="12pt" fo:margin-top="0pt" fo:margin-bottom="0pt"/>
      <style:text-properties/>
    </style:style>
    <style:style style:family="text" style:name="T1372">
      <style:text-properties fo:color="#1f1f1f" fo:font-family="Arial" style:font-family-asian="Arial" style:font-family-complex="Arial" fo:font-size="12pt"/>
    </style:style>
    <style:style style:family="table-cell" style:name="ce6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8">
      <style:paragraph-properties style:line-height-at-least="12pt" fo:margin-top="0pt" fo:margin-bottom="0pt"/>
      <style:text-properties/>
    </style:style>
    <style:style style:family="text" style:name="T1373">
      <style:text-properties fo:color="#1f1f1f" fo:font-family="Arial" style:font-family-asian="Arial" style:font-family-complex="Arial" fo:font-size="12pt"/>
    </style:style>
    <style:style style:family="table-cell" style:name="ce6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49">
      <style:paragraph-properties style:line-height-at-least="12pt" fo:margin-top="0pt" fo:margin-bottom="0pt"/>
      <style:text-properties/>
    </style:style>
    <style:style style:family="text" style:name="T1374">
      <style:text-properties fo:color="#1f1f1f" fo:font-family="Arial" style:font-family-asian="Arial" style:font-family-complex="Arial" fo:font-size="12pt"/>
    </style:style>
    <style:style style:family="table-row" style:name="ro22">
      <style:table-row-properties/>
    </style:style>
    <style:style style:family="table-cell" style:name="ce6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50">
      <style:paragraph-properties style:line-height-at-least="12pt" fo:margin-top="0pt" fo:margin-bottom="0pt"/>
      <style:text-properties/>
    </style:style>
    <style:style style:family="text" style:name="T1375">
      <style:text-properties fo:color="#1f1f1f" fo:font-family="Arial" style:font-family-asian="Arial" style:font-family-complex="Arial" fo:font-size="12pt"/>
    </style:style>
    <style:style style:family="table-cell" style:name="ce6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51">
      <style:paragraph-properties style:line-height-at-least="12pt" fo:margin-top="0pt" fo:margin-bottom="0pt"/>
      <style:text-properties/>
    </style:style>
    <style:style style:family="text" style:name="T1376">
      <style:text-properties fo:color="#1f1f1f" fo:font-family="Arial" style:font-family-asian="Arial" style:font-family-complex="Arial" fo:font-size="12pt"/>
    </style:style>
    <style:style style:family="table-cell" style:name="ce6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52">
      <style:paragraph-properties style:line-height-at-least="12pt" fo:margin-top="0pt" fo:margin-bottom="0pt"/>
      <style:text-properties/>
    </style:style>
    <style:style style:family="text" style:name="T1377">
      <style:text-properties fo:color="#1f1f1f" fo:font-family="Arial" style:font-family-asian="Arial" style:font-family-complex="Arial" fo:font-size="12pt"/>
    </style:style>
    <style:style style:parent-style-name="852" style:family="paragraph" style:name="P75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78">
      <style:text-properties fo:color="#1f1f1f" fo:font-family="Arial" style:font-family-asian="Arial" style:font-family-complex="Arial" fo:font-size="12pt" fo:font-weight="bold"/>
    </style:style>
    <style:style style:family="paragraph" style:name="P75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79">
      <style:text-properties fo:color="#1f1f1f" fo:font-family="Arial" style:font-family-asian="Arial" style:font-family-complex="Arial" fo:font-size="12pt"/>
    </style:style>
    <style:style style:parent-style-name="851" style:family="paragraph" style:name="P75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80">
      <style:text-properties fo:color="#1f1f1f" fo:font-family="Arial" style:font-family-asian="Arial" style:font-family-complex="Arial" fo:font-size="14pt" fo:font-weight="bold"/>
    </style:style>
    <style:style style:parent-style-name="912" style:list-style-name="WWNum40" style:family="paragraph" style:name="P756">
      <style:paragraph-properties fo:line-height="115%" fo:margin-right="0cm" fo:margin-top="0pt" fo:margin-bottom="0pt" fo:border="none"/>
      <style:text-properties fo:font-family="Arial" style:font-family-asian="Arial" style:font-family-complex="Arial" fo:font-size="12pt"/>
    </style:style>
    <style:style style:family="text" style:name="T1381">
      <style:text-properties fo:color="#1f1f1f" fo:font-family="Arial" style:font-family-asian="Arial" style:font-family-complex="Arial" fo:font-size="12pt"/>
    </style:style>
    <style:style style:parent-style-name="912" style:list-style-name="WWNum40" style:family="paragraph" style:name="P757">
      <style:paragraph-properties fo:line-height="115%" fo:margin-right="0cm" fo:margin-top="0pt" fo:margin-bottom="0pt" fo:border="none"/>
      <style:text-properties fo:font-family="Arial" style:font-family-asian="Arial" style:font-family-complex="Arial" fo:font-size="12pt"/>
    </style:style>
    <style:style style:family="text" style:name="T1382">
      <style:text-properties fo:color="#1f1f1f" fo:font-family="Arial" style:font-family-asian="Arial" style:font-family-complex="Arial" fo:font-size="12pt"/>
    </style:style>
    <style:style style:parent-style-name="912" style:list-style-name="WWNum40" style:family="paragraph" style:name="P758">
      <style:paragraph-properties fo:line-height="115%" fo:margin-right="0cm" fo:margin-top="0pt" fo:margin-bottom="0pt" fo:border="none"/>
      <style:text-properties fo:font-family="Arial" style:font-family-asian="Arial" style:font-family-complex="Arial" fo:font-size="12pt"/>
    </style:style>
    <style:style style:family="text" style:name="T1383">
      <style:text-properties fo:color="#1f1f1f" fo:font-family="Arial" style:font-family-asian="Arial" style:font-family-complex="Arial" fo:font-size="12pt"/>
    </style:style>
    <style:style style:parent-style-name="912" style:list-style-name="WWNum40" style:family="paragraph" style:name="P759">
      <style:paragraph-properties fo:line-height="115%" fo:margin-right="0cm" fo:margin-top="0pt" fo:margin-bottom="0pt" fo:border="none"/>
      <style:text-properties fo:font-family="Arial" style:font-family-asian="Arial" style:font-family-complex="Arial" fo:font-size="12pt"/>
    </style:style>
    <style:style style:family="text" style:name="T1384">
      <style:text-properties fo:color="#1f1f1f" fo:font-family="Arial" style:font-family-asian="Arial" style:font-family-complex="Arial" fo:font-size="12pt"/>
    </style:style>
    <style:style style:family="paragraph" style:name="P760">
      <style:paragraph-properties/>
      <style:text-properties/>
    </style:style>
    <style:style style:family="paragraph" style:name="P761">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385">
      <style:text-properties fo:color="#1f1f1f" fo:font-family="Arial" style:font-family-asian="Arial" style:font-family-complex="Arial" fo:font-size="12pt"/>
    </style:style>
    <style:style style:parent-style-name="851" style:family="paragraph" style:name="P76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86">
      <style:text-properties fo:color="#1f1f1f" fo:font-family="Arial" style:font-family-asian="Arial" style:font-family-complex="Arial" fo:font-size="14pt" fo:font-weight="bold"/>
    </style:style>
    <style:style style:family="paragraph" style:name="P76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87">
      <style:text-properties fo:color="#1f1f1f" fo:font-family="Arial" style:font-family-asian="Arial" style:font-family-complex="Arial" fo:font-size="12pt"/>
    </style:style>
    <style:style style:parent-style-name="852" style:family="paragraph" style:name="P76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88">
      <style:text-properties fo:color="#1f1f1f" fo:font-family="Arial" style:font-family-asian="Arial" style:font-family-complex="Arial" fo:font-size="12pt" fo:font-weight="bold"/>
    </style:style>
    <style:style style:family="paragraph" style:name="P76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89">
      <style:text-properties fo:color="#1f1f1f" fo:font-family="Arial" style:font-family-asian="Arial" style:font-family-complex="Arial" fo:font-size="12pt"/>
    </style:style>
    <style:style style:parent-style-name="852" style:family="paragraph" style:name="P76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90">
      <style:text-properties fo:color="#1f1f1f" fo:font-family="Arial" style:font-family-asian="Arial" style:font-family-complex="Arial" fo:font-size="12pt" fo:font-weight="bold"/>
    </style:style>
    <style:style style:family="paragraph" style:name="P76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91">
      <style:text-properties fo:color="#1f1f1f" fo:font-family="Arial" style:font-family-asian="Arial" style:font-family-complex="Arial" fo:font-size="12pt"/>
    </style:style>
    <style:style style:parent-style-name="852" style:family="paragraph" style:name="P76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92">
      <style:text-properties fo:color="#1f1f1f" fo:font-family="Arial" style:font-family-asian="Arial" style:font-family-complex="Arial" fo:font-size="12pt" fo:font-weight="bold"/>
    </style:style>
    <style:style style:family="paragraph" style:name="P76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93">
      <style:text-properties fo:color="#1f1f1f" fo:font-family="Arial" style:font-family-asian="Arial" style:font-family-complex="Arial" fo:font-size="12pt"/>
    </style:style>
    <style:style style:parent-style-name="852" style:family="paragraph" style:name="P77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394">
      <style:text-properties fo:color="#1f1f1f" fo:font-family="Arial" style:font-family-asian="Arial" style:font-family-complex="Arial" fo:font-size="12pt" fo:font-weight="bold"/>
    </style:style>
    <style:style style:family="paragraph" style:name="P77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395">
      <style:text-properties fo:color="#1f1f1f" fo:font-family="Arial" style:font-family-asian="Arial" style:font-family-complex="Arial" fo:font-size="12pt"/>
    </style:style>
    <style:style style:parent-style-name="851" style:family="paragraph" style:name="P77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96">
      <style:text-properties fo:color="#1f1f1f" fo:font-family="Arial" style:font-family-asian="Arial" style:font-family-complex="Arial" fo:font-size="14pt" fo:font-weight="bold"/>
    </style:style>
    <style:style style:parent-style-name="912" style:list-style-name="WWNum41" style:family="paragraph" style:name="P773">
      <style:paragraph-properties fo:line-height="115%" fo:margin-right="0cm" fo:margin-top="0pt" fo:margin-bottom="0pt" fo:border="none"/>
      <style:text-properties fo:font-family="Arial" style:font-family-asian="Arial" style:font-family-complex="Arial" fo:font-size="12pt"/>
    </style:style>
    <style:style style:family="text" style:name="T1397">
      <style:text-properties fo:color="#1f1f1f" fo:font-family="Arial" style:font-family-asian="Arial" style:font-family-complex="Arial" fo:font-size="12pt"/>
    </style:style>
    <style:style style:parent-style-name="912" style:list-style-name="WWNum41" style:family="paragraph" style:name="P774">
      <style:paragraph-properties fo:line-height="115%" fo:margin-right="0cm" fo:margin-top="0pt" fo:margin-bottom="0pt" fo:border="none"/>
      <style:text-properties fo:font-family="Arial" style:font-family-asian="Arial" style:font-family-complex="Arial" fo:font-size="12pt"/>
    </style:style>
    <style:style style:family="text" style:name="T1398">
      <style:text-properties fo:color="#1f1f1f" fo:font-family="Arial" style:font-family-asian="Arial" style:font-family-complex="Arial" fo:font-size="12pt"/>
    </style:style>
    <style:style style:parent-style-name="912" style:list-style-name="WWNum41" style:family="paragraph" style:name="P775">
      <style:paragraph-properties fo:line-height="115%" fo:margin-right="0cm" fo:margin-top="0pt" fo:margin-bottom="0pt" fo:border="none"/>
      <style:text-properties fo:font-family="Arial" style:font-family-asian="Arial" style:font-family-complex="Arial" fo:font-size="12pt"/>
    </style:style>
    <style:style style:family="text" style:name="T1399">
      <style:text-properties fo:color="#1f1f1f" fo:font-family="Arial" style:font-family-asian="Arial" style:font-family-complex="Arial" fo:font-size="12pt"/>
    </style:style>
    <style:style style:parent-style-name="912" style:list-style-name="WWNum41" style:family="paragraph" style:name="P776">
      <style:paragraph-properties fo:line-height="115%" fo:margin-right="0cm" fo:margin-top="0pt" fo:margin-bottom="0pt" fo:border="none"/>
      <style:text-properties fo:font-family="Arial" style:font-family-asian="Arial" style:font-family-complex="Arial" fo:font-size="12pt"/>
    </style:style>
    <style:style style:family="text" style:name="T1400">
      <style:text-properties fo:color="#1f1f1f" fo:font-family="Arial" style:font-family-asian="Arial" style:font-family-complex="Arial" fo:font-size="12pt"/>
    </style:style>
    <style:style style:family="paragraph" style:name="P777">
      <style:paragraph-properties/>
      <style:text-properties/>
    </style:style>
    <style:style style:family="paragraph" style:name="P778">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401">
      <style:text-properties fo:color="#1f1f1f" fo:font-family="Arial" style:font-family-asian="Arial" style:font-family-complex="Arial" fo:font-size="12pt"/>
    </style:style>
    <style:style style:parent-style-name="851" style:family="paragraph" style:name="P77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02">
      <style:text-properties fo:color="#1f1f1f" fo:font-family="Arial" style:font-family-asian="Arial" style:font-family-complex="Arial" fo:font-size="14pt" fo:font-weight="bold"/>
    </style:style>
    <style:style style:family="paragraph" style:name="P78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03">
      <style:text-properties fo:color="#1f1f1f" fo:font-family="Arial" style:font-family-asian="Arial" style:font-family-complex="Arial" fo:font-size="12pt"/>
    </style:style>
    <style:style style:parent-style-name="852" style:family="paragraph" style:name="P78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04">
      <style:text-properties fo:color="#1f1f1f" fo:font-family="Arial" style:font-family-asian="Arial" style:font-family-complex="Arial" fo:font-size="12pt" fo:font-weight="bold"/>
    </style:style>
    <style:style style:parent-style-name="912" style:list-style-name="WWNum42" style:family="paragraph" style:name="P782">
      <style:paragraph-properties fo:line-height="115%" fo:margin-right="0cm" fo:margin-top="0pt" fo:margin-bottom="0pt" fo:border="none"/>
      <style:text-properties fo:font-family="Arial" style:font-family-asian="Arial" style:font-family-complex="Arial" fo:font-size="12pt"/>
    </style:style>
    <style:style style:family="text" style:name="T1405">
      <style:text-properties fo:color="#1f1f1f" fo:font-family="Arial" style:font-family-asian="Arial" style:font-family-complex="Arial" fo:font-size="12pt"/>
    </style:style>
    <style:style style:parent-style-name="912" style:list-style-name="WWNum42" style:family="paragraph" style:name="P783">
      <style:paragraph-properties fo:line-height="115%" fo:margin-right="0cm" fo:margin-top="0pt" fo:margin-bottom="0pt" fo:border="none"/>
      <style:text-properties fo:font-family="Arial" style:font-family-asian="Arial" style:font-family-complex="Arial" fo:font-size="12pt"/>
    </style:style>
    <style:style style:family="text" style:name="T1406">
      <style:text-properties fo:color="#1f1f1f" fo:font-family="Arial" style:font-family-asian="Arial" style:font-family-complex="Arial" fo:font-size="12pt"/>
    </style:style>
    <style:style style:parent-style-name="912" style:list-style-name="WWNum42" style:family="paragraph" style:name="P784">
      <style:paragraph-properties fo:line-height="115%" fo:margin-right="0cm" fo:margin-top="0pt" fo:margin-bottom="0pt" fo:border="none"/>
      <style:text-properties fo:font-family="Arial" style:font-family-asian="Arial" style:font-family-complex="Arial" fo:font-size="12pt"/>
    </style:style>
    <style:style style:family="text" style:name="T1407">
      <style:text-properties fo:color="#1f1f1f" fo:font-family="Arial" style:font-family-asian="Arial" style:font-family-complex="Arial" fo:font-size="12pt"/>
    </style:style>
    <style:style style:parent-style-name="852" style:family="paragraph" style:name="P78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08">
      <style:text-properties fo:color="#1f1f1f" fo:font-family="Arial" style:font-family-asian="Arial" style:font-family-complex="Arial" fo:font-size="12pt" fo:font-weight="bold"/>
    </style:style>
    <style:style style:parent-style-name="912" style:list-style-name="WWNum42" style:family="paragraph" style:name="P786">
      <style:paragraph-properties fo:line-height="115%" fo:margin-right="0cm" fo:margin-top="0pt" fo:margin-bottom="0pt" fo:border="none"/>
      <style:text-properties fo:font-family="Arial" style:font-family-asian="Arial" style:font-family-complex="Arial" fo:font-size="12pt"/>
    </style:style>
    <style:style style:family="text" style:name="T1409">
      <style:text-properties fo:color="#1f1f1f" fo:font-family="Arial" style:font-family-asian="Arial" style:font-family-complex="Arial" fo:font-size="12pt"/>
    </style:style>
    <style:style style:parent-style-name="912" style:list-style-name="WWNum42" style:family="paragraph" style:name="P787">
      <style:paragraph-properties fo:line-height="115%" fo:margin-right="0cm" fo:margin-top="0pt" fo:margin-bottom="0pt" fo:border="none"/>
      <style:text-properties fo:font-family="Arial" style:font-family-asian="Arial" style:font-family-complex="Arial" fo:font-size="12pt"/>
    </style:style>
    <style:style style:family="text" style:name="T1410">
      <style:text-properties fo:color="#1f1f1f" fo:font-family="Arial" style:font-family-asian="Arial" style:font-family-complex="Arial" fo:font-size="12pt"/>
    </style:style>
    <style:style style:parent-style-name="912" style:list-style-name="WWNum42" style:family="paragraph" style:name="P788">
      <style:paragraph-properties fo:line-height="115%" fo:margin-right="0cm" fo:margin-top="0pt" fo:margin-bottom="0pt" fo:border="none"/>
      <style:text-properties fo:font-family="Arial" style:font-family-asian="Arial" style:font-family-complex="Arial" fo:font-size="12pt"/>
    </style:style>
    <style:style style:family="text" style:name="T1411">
      <style:text-properties fo:color="#1f1f1f" fo:font-family="Arial" style:font-family-asian="Arial" style:font-family-complex="Arial" fo:font-size="12pt"/>
    </style:style>
    <style:style style:parent-style-name="852" style:family="paragraph" style:name="P78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12">
      <style:text-properties fo:color="#1f1f1f" fo:font-family="Arial" style:font-family-asian="Arial" style:font-family-complex="Arial" fo:font-size="12pt" fo:font-weight="bold"/>
    </style:style>
    <style:style style:parent-style-name="912" style:list-style-name="WWNum42" style:family="paragraph" style:name="P790">
      <style:paragraph-properties fo:line-height="115%" fo:margin-right="0cm" fo:margin-top="0pt" fo:margin-bottom="0pt" fo:border="none"/>
      <style:text-properties fo:font-family="Arial" style:font-family-asian="Arial" style:font-family-complex="Arial" fo:font-size="12pt"/>
    </style:style>
    <style:style style:family="text" style:name="T1413">
      <style:text-properties fo:color="#1f1f1f" fo:font-family="Arial" style:font-family-asian="Arial" style:font-family-complex="Arial" fo:font-size="12pt"/>
    </style:style>
    <style:style style:parent-style-name="912" style:list-style-name="WWNum42" style:family="paragraph" style:name="P791">
      <style:paragraph-properties fo:line-height="115%" fo:margin-right="0cm" fo:margin-top="0pt" fo:margin-bottom="0pt" fo:border="none"/>
      <style:text-properties fo:font-family="Arial" style:font-family-asian="Arial" style:font-family-complex="Arial" fo:font-size="12pt"/>
    </style:style>
    <style:style style:family="text" style:name="T1414">
      <style:text-properties fo:color="#1f1f1f" fo:font-family="Arial" style:font-family-asian="Arial" style:font-family-complex="Arial" fo:font-size="12pt"/>
    </style:style>
    <style:style style:parent-style-name="912" style:list-style-name="WWNum42" style:family="paragraph" style:name="P792">
      <style:paragraph-properties fo:line-height="115%" fo:margin-right="0cm" fo:margin-top="0pt" fo:margin-bottom="0pt" fo:border="none"/>
      <style:text-properties fo:font-family="Arial" style:font-family-asian="Arial" style:font-family-complex="Arial" fo:font-size="12pt"/>
    </style:style>
    <style:style style:family="text" style:name="T1415">
      <style:text-properties fo:color="#1f1f1f" fo:font-family="Arial" style:font-family-asian="Arial" style:font-family-complex="Arial" fo:font-size="12pt"/>
    </style:style>
    <style:style style:parent-style-name="852" style:family="paragraph" style:name="P79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16">
      <style:text-properties fo:color="#1f1f1f" fo:font-family="Arial" style:font-family-asian="Arial" style:font-family-complex="Arial" fo:font-size="12pt" fo:font-weight="bold"/>
    </style:style>
    <style:style style:parent-style-name="912" style:list-style-name="WWNum42" style:family="paragraph" style:name="P794">
      <style:paragraph-properties fo:line-height="115%" fo:margin-right="0cm" fo:margin-top="0pt" fo:margin-bottom="0pt" fo:border="none"/>
      <style:text-properties fo:font-family="Arial" style:font-family-asian="Arial" style:font-family-complex="Arial" fo:font-size="12pt"/>
    </style:style>
    <style:style style:family="text" style:name="T1417">
      <style:text-properties fo:color="#1f1f1f" fo:font-family="Arial" style:font-family-asian="Arial" style:font-family-complex="Arial" fo:font-size="12pt"/>
    </style:style>
    <style:style style:parent-style-name="912" style:list-style-name="WWNum42" style:family="paragraph" style:name="P795">
      <style:paragraph-properties fo:line-height="115%" fo:margin-right="0cm" fo:margin-top="0pt" fo:margin-bottom="0pt" fo:border="none"/>
      <style:text-properties fo:font-family="Arial" style:font-family-asian="Arial" style:font-family-complex="Arial" fo:font-size="12pt"/>
    </style:style>
    <style:style style:family="text" style:name="T1418">
      <style:text-properties fo:color="#1f1f1f" fo:font-family="Arial" style:font-family-asian="Arial" style:font-family-complex="Arial" fo:font-size="12pt"/>
    </style:style>
    <style:style style:family="table" style:name="ta7">
      <style:paragraph-properties fo:line-height="100%" fo:margin-bottom="0pt"/>
      <style:table-properties style:width="9.335cm" fo:margin-left="0cm" table:align="left" style:use-optimal-column-width="true"/>
    </style:style>
    <style:style style:family="table-column" style:name="co18">
      <style:table-column-properties style:column-width="1.54cm" style:use-optimal-column-width="true"/>
    </style:style>
    <style:style style:family="table-column" style:name="co19">
      <style:table-column-properties style:column-width="3.039cm" style:use-optimal-column-width="true"/>
    </style:style>
    <style:style style:family="table-column" style:name="co20">
      <style:table-column-properties style:column-width="4.756cm" style:use-optimal-column-width="true"/>
    </style:style>
    <style:style style:family="table-row" style:name="ro23">
      <style:table-row-properties/>
    </style:style>
    <style:style style:family="table-cell" style:name="ce7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96">
      <style:paragraph-properties style:line-height-at-least="12pt" fo:margin-top="0pt" fo:margin-bottom="0pt"/>
      <style:text-properties/>
    </style:style>
    <style:style style:family="text" style:name="T1419">
      <style:text-properties fo:color="#1f1f1f" fo:font-family="Arial" style:font-family-asian="Arial" style:font-family-complex="Arial" fo:font-size="12pt" fo:font-weight="bold"/>
    </style:style>
    <style:style style:family="table-cell" style:name="ce7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97">
      <style:paragraph-properties style:line-height-at-least="12pt" fo:margin-top="0pt" fo:margin-bottom="0pt"/>
      <style:text-properties/>
    </style:style>
    <style:style style:family="text" style:name="T1420">
      <style:text-properties fo:color="#1f1f1f" fo:font-family="Arial" style:font-family-asian="Arial" style:font-family-complex="Arial" fo:font-size="12pt" fo:font-weight="bold"/>
    </style:style>
    <style:style style:family="table-cell" style:name="ce7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98">
      <style:paragraph-properties style:line-height-at-least="12pt" fo:margin-top="0pt" fo:margin-bottom="0pt"/>
      <style:text-properties/>
    </style:style>
    <style:style style:family="text" style:name="T1421">
      <style:text-properties fo:color="#1f1f1f" fo:font-family="Arial" style:font-family-asian="Arial" style:font-family-complex="Arial" fo:font-size="12pt" fo:font-weight="bold"/>
    </style:style>
    <style:style style:family="table-row" style:name="ro24">
      <style:table-row-properties/>
    </style:style>
    <style:style style:family="table-cell" style:name="ce7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99">
      <style:paragraph-properties style:line-height-at-least="12pt" fo:margin-top="0pt" fo:margin-bottom="0pt"/>
      <style:text-properties/>
    </style:style>
    <style:style style:family="text" style:name="T1422">
      <style:text-properties fo:color="#1f1f1f" fo:font-family="Arial" style:font-family-asian="Arial" style:font-family-complex="Arial" fo:font-size="12pt"/>
    </style:style>
    <style:style style:family="table-cell" style:name="ce7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00">
      <style:paragraph-properties style:line-height-at-least="12pt" fo:margin-top="0pt" fo:margin-bottom="0pt"/>
      <style:text-properties/>
    </style:style>
    <style:style style:family="text" style:name="T1423">
      <style:text-properties fo:color="#1f1f1f" fo:font-family="Arial" style:font-family-asian="Arial" style:font-family-complex="Arial" fo:font-size="12pt"/>
    </style:style>
    <style:style style:family="table-cell" style:name="ce7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01">
      <style:paragraph-properties style:line-height-at-least="12pt" fo:margin-top="0pt" fo:margin-bottom="0pt"/>
      <style:text-properties/>
    </style:style>
    <style:style style:family="text" style:name="T1424">
      <style:text-properties fo:color="#1f1f1f" fo:font-family="Arial" style:font-family-asian="Arial" style:font-family-complex="Arial" fo:font-size="12pt"/>
    </style:style>
    <style:style style:family="table-row" style:name="ro25">
      <style:table-row-properties/>
    </style:style>
    <style:style style:family="table-cell" style:name="ce7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02">
      <style:paragraph-properties style:line-height-at-least="12pt" fo:margin-top="0pt" fo:margin-bottom="0pt"/>
      <style:text-properties/>
    </style:style>
    <style:style style:family="text" style:name="T1425">
      <style:text-properties fo:color="#1f1f1f" fo:font-family="Arial" style:font-family-asian="Arial" style:font-family-complex="Arial" fo:font-size="12pt"/>
    </style:style>
    <style:style style:family="table-cell" style:name="ce7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03">
      <style:paragraph-properties style:line-height-at-least="12pt" fo:margin-top="0pt" fo:margin-bottom="0pt"/>
      <style:text-properties/>
    </style:style>
    <style:style style:family="text" style:name="T1426">
      <style:text-properties fo:color="#1f1f1f" fo:font-family="Arial" style:font-family-asian="Arial" style:font-family-complex="Arial" fo:font-size="12pt"/>
    </style:style>
    <style:style style:family="table-cell" style:name="ce7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04">
      <style:paragraph-properties style:line-height-at-least="12pt" fo:margin-top="0pt" fo:margin-bottom="0pt"/>
      <style:text-properties/>
    </style:style>
    <style:style style:family="text" style:name="T1427">
      <style:text-properties fo:color="#1f1f1f" fo:font-family="Arial" style:font-family-asian="Arial" style:font-family-complex="Arial" fo:font-size="12pt"/>
    </style:style>
    <style:style style:parent-style-name="851" style:family="paragraph" style:name="P80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28">
      <style:text-properties fo:color="#1f1f1f" fo:font-family="Arial" style:font-family-asian="Arial" style:font-family-complex="Arial" fo:font-size="14pt" fo:font-weight="bold"/>
    </style:style>
    <style:style style:parent-style-name="912" style:list-style-name="WWNum42" style:family="paragraph" style:name="P806">
      <style:paragraph-properties fo:line-height="115%" fo:margin-right="0cm" fo:margin-top="0pt" fo:margin-bottom="0pt" fo:border="none"/>
      <style:text-properties fo:font-family="Arial" style:font-family-asian="Arial" style:font-family-complex="Arial" fo:font-size="12pt"/>
    </style:style>
    <style:style style:family="text" style:name="T1429">
      <style:text-properties fo:color="#1f1f1f" fo:font-family="Arial" style:font-family-asian="Arial" style:font-family-complex="Arial" fo:font-size="12pt"/>
    </style:style>
    <style:style style:parent-style-name="912" style:list-style-name="WWNum42" style:family="paragraph" style:name="P807">
      <style:paragraph-properties fo:line-height="115%" fo:margin-right="0cm" fo:margin-top="0pt" fo:margin-bottom="0pt" fo:border="none"/>
      <style:text-properties fo:font-family="Arial" style:font-family-asian="Arial" style:font-family-complex="Arial" fo:font-size="12pt"/>
    </style:style>
    <style:style style:family="text" style:name="T1430">
      <style:text-properties fo:color="#1f1f1f" fo:font-family="Arial" style:font-family-asian="Arial" style:font-family-complex="Arial" fo:font-size="12pt"/>
    </style:style>
    <style:style style:parent-style-name="912" style:list-style-name="WWNum42" style:family="paragraph" style:name="P808">
      <style:paragraph-properties fo:line-height="115%" fo:margin-right="0cm" fo:margin-top="0pt" fo:margin-bottom="0pt" fo:border="none"/>
      <style:text-properties fo:font-family="Arial" style:font-family-asian="Arial" style:font-family-complex="Arial" fo:font-size="12pt"/>
    </style:style>
    <style:style style:family="text" style:name="T1431">
      <style:text-properties fo:color="#1f1f1f" fo:font-family="Arial" style:font-family-asian="Arial" style:font-family-complex="Arial" fo:font-size="12pt"/>
    </style:style>
    <style:style style:parent-style-name="912" style:list-style-name="WWNum42" style:family="paragraph" style:name="P809">
      <style:paragraph-properties fo:line-height="115%" fo:margin-right="0cm" fo:margin-top="0pt" fo:margin-bottom="0pt" fo:border="none"/>
      <style:text-properties fo:font-family="Arial" style:font-family-asian="Arial" style:font-family-complex="Arial" fo:font-size="12pt"/>
    </style:style>
    <style:style style:family="text" style:name="T1432">
      <style:text-properties fo:color="#1f1f1f" fo:font-family="Arial" style:font-family-asian="Arial" style:font-family-complex="Arial" fo:font-size="12pt"/>
    </style:style>
    <style:style style:family="paragraph" style:name="P810">
      <style:paragraph-properties/>
      <style:text-properties/>
    </style:style>
    <style:style style:family="paragraph" style:name="P811">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433">
      <style:text-properties fo:color="#1f1f1f" fo:font-family="Arial" style:font-family-asian="Arial" style:font-family-complex="Arial" fo:font-size="12pt"/>
    </style:style>
    <style:style style:parent-style-name="851" style:family="paragraph" style:name="P81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34">
      <style:text-properties fo:color="#1f1f1f" fo:font-family="Arial" style:font-family-asian="Arial" style:font-family-complex="Arial" fo:font-size="14pt" fo:font-weight="bold"/>
    </style:style>
    <style:style style:family="paragraph" style:name="P81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35">
      <style:text-properties fo:color="#1f1f1f" fo:font-family="Arial" style:font-family-asian="Arial" style:font-family-complex="Arial" fo:font-size="12pt"/>
    </style:style>
    <style:style style:parent-style-name="852" style:family="paragraph" style:name="P81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36">
      <style:text-properties fo:color="#1f1f1f" fo:font-family="Arial" style:font-family-asian="Arial" style:font-family-complex="Arial" fo:font-size="12pt" fo:font-weight="bold"/>
    </style:style>
    <style:style style:family="paragraph" style:name="P81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37">
      <style:text-properties fo:color="#1f1f1f" fo:font-family="Arial" style:font-family-asian="Arial" style:font-family-complex="Arial" fo:font-size="12pt"/>
    </style:style>
    <style:style style:family="text" style:name="T1438">
      <style:text-properties fo:color="#1f1f1f" fo:font-family="Arial" style:font-family-asian="Arial" style:font-family-complex="Arial" fo:font-size="12pt"/>
    </style:style>
    <style:style style:parent-style-name="852" style:family="paragraph" style:name="P81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39">
      <style:text-properties fo:color="#1f1f1f" fo:font-family="Arial" style:font-family-asian="Arial" style:font-family-complex="Arial" fo:font-size="12pt" fo:font-weight="bold"/>
    </style:style>
    <style:style style:family="paragraph" style:name="P81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40">
      <style:text-properties fo:color="#1f1f1f" fo:font-family="Arial" style:font-family-asian="Arial" style:font-family-complex="Arial" fo:font-size="12pt"/>
    </style:style>
    <style:style style:family="text" style:name="T1441">
      <style:text-properties fo:color="#1f1f1f" fo:font-family="Arial" style:font-family-asian="Arial" style:font-family-complex="Arial" fo:font-size="12pt"/>
    </style:style>
    <style:style style:parent-style-name="852" style:family="paragraph" style:name="P81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42">
      <style:text-properties fo:color="#1f1f1f" fo:font-family="Arial" style:font-family-asian="Arial" style:font-family-complex="Arial" fo:font-size="12pt" fo:font-weight="bold"/>
    </style:style>
    <style:style style:family="paragraph" style:name="P8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43">
      <style:text-properties fo:color="#1f1f1f" fo:font-family="Arial" style:font-family-asian="Arial" style:font-family-complex="Arial" fo:font-size="12pt"/>
    </style:style>
    <style:style style:family="text" style:name="T1444">
      <style:text-properties fo:color="#1f1f1f" fo:font-family="Arial" style:font-family-asian="Arial" style:font-family-complex="Arial" fo:font-size="12pt"/>
    </style:style>
    <style:style style:parent-style-name="852" style:family="paragraph" style:name="P82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45">
      <style:text-properties fo:color="#1f1f1f" fo:font-family="Arial" style:font-family-asian="Arial" style:font-family-complex="Arial" fo:font-size="12pt" fo:font-weight="bold"/>
    </style:style>
    <style:style style:family="paragraph" style:name="P8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46">
      <style:text-properties fo:color="#1f1f1f" fo:font-family="Arial" style:font-family-asian="Arial" style:font-family-complex="Arial" fo:font-size="12pt"/>
    </style:style>
    <style:style style:parent-style-name="851" style:family="paragraph" style:name="P82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47">
      <style:text-properties fo:color="#1f1f1f" fo:font-family="Arial" style:font-family-asian="Arial" style:font-family-complex="Arial" fo:font-size="14pt" fo:font-weight="bold"/>
    </style:style>
    <style:style style:parent-style-name="912" style:list-style-name="WWNum43" style:family="paragraph" style:name="P823">
      <style:paragraph-properties fo:line-height="115%" fo:margin-right="0cm" fo:margin-top="0pt" fo:margin-bottom="0pt" fo:border="none"/>
      <style:text-properties fo:font-family="Arial" style:font-family-asian="Arial" style:font-family-complex="Arial" fo:font-size="12pt"/>
    </style:style>
    <style:style style:family="text" style:name="T1448">
      <style:text-properties fo:color="#1f1f1f" fo:font-family="Arial" style:font-family-asian="Arial" style:font-family-complex="Arial" fo:font-size="12pt"/>
    </style:style>
    <style:style style:parent-style-name="912" style:list-style-name="WWNum43" style:family="paragraph" style:name="P824">
      <style:paragraph-properties fo:line-height="115%" fo:margin-right="0cm" fo:margin-top="0pt" fo:margin-bottom="0pt" fo:border="none"/>
      <style:text-properties fo:font-family="Arial" style:font-family-asian="Arial" style:font-family-complex="Arial" fo:font-size="12pt"/>
    </style:style>
    <style:style style:family="text" style:name="T1449">
      <style:text-properties fo:color="#1f1f1f" fo:font-family="Arial" style:font-family-asian="Arial" style:font-family-complex="Arial" fo:font-size="12pt"/>
    </style:style>
    <style:style style:parent-style-name="912" style:list-style-name="WWNum43" style:family="paragraph" style:name="P825">
      <style:paragraph-properties fo:line-height="115%" fo:margin-right="0cm" fo:margin-top="0pt" fo:margin-bottom="0pt" fo:border="none"/>
      <style:text-properties fo:font-family="Arial" style:font-family-asian="Arial" style:font-family-complex="Arial" fo:font-size="12pt"/>
    </style:style>
    <style:style style:family="text" style:name="T1450">
      <style:text-properties fo:color="#1f1f1f" fo:font-family="Arial" style:font-family-asian="Arial" style:font-family-complex="Arial" fo:font-size="12pt"/>
    </style:style>
    <style:style style:parent-style-name="912" style:list-style-name="WWNum43" style:family="paragraph" style:name="P826">
      <style:paragraph-properties fo:line-height="115%" fo:margin-right="0cm" fo:margin-top="0pt" fo:margin-bottom="0pt" fo:border="none"/>
      <style:text-properties fo:font-family="Arial" style:font-family-asian="Arial" style:font-family-complex="Arial" fo:font-size="12pt"/>
    </style:style>
    <style:style style:family="text" style:name="T1451">
      <style:text-properties fo:color="#1f1f1f" fo:font-family="Arial" style:font-family-asian="Arial" style:font-family-complex="Arial" fo:font-size="12pt"/>
    </style:style>
    <style:style style:family="paragraph" style:name="P827">
      <style:paragraph-properties/>
      <style:text-properties/>
    </style:style>
    <style:style style:parent-style-name="851" style:family="paragraph" style:name="P82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452">
      <style:text-properties fo:color="#1f1f1f" fo:font-family="Arial" style:font-family-asian="Arial" style:font-family-complex="Arial" fo:font-size="14pt" fo:font-weight="bold"/>
    </style:style>
    <style:style style:family="paragraph" style:name="P82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53">
      <style:text-properties fo:color="#1f1f1f" fo:font-family="Arial" style:font-family-asian="Arial" style:font-family-complex="Arial" fo:font-size="12pt"/>
    </style:style>
    <style:style style:parent-style-name="852" style:family="paragraph" style:name="P83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54">
      <style:text-properties fo:color="#1f1f1f" fo:font-family="Arial" style:font-family-asian="Arial" style:font-family-complex="Arial" fo:font-size="12pt" fo:font-weight="bold"/>
    </style:style>
    <style:style style:family="paragraph" style:name="P83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55">
      <style:text-properties fo:color="#1f1f1f" fo:font-family="Arial" style:font-family-asian="Arial" style:font-family-complex="Arial" fo:font-size="12pt"/>
    </style:style>
    <style:style style:family="text" style:name="T1456">
      <style:text-properties fo:color="#1f1f1f" fo:font-family="Arial" style:font-family-asian="Arial" style:font-family-complex="Arial" fo:font-size="12pt"/>
    </style:style>
    <style:style style:parent-style-name="852" style:family="paragraph" style:name="P83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57">
      <style:text-properties fo:color="#1f1f1f" fo:font-family="Arial" style:font-family-asian="Arial" style:font-family-complex="Arial" fo:font-size="12pt" fo:font-weight="bold"/>
    </style:style>
    <style:style style:family="paragraph" style:name="P83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58">
      <style:text-properties fo:color="#1f1f1f" fo:font-family="Arial" style:font-family-asian="Arial" style:font-family-complex="Arial" fo:font-size="12pt"/>
    </style:style>
    <style:style style:family="text" style:name="T1459">
      <style:text-properties fo:color="#1f1f1f" fo:font-family="Arial" style:font-family-asian="Arial" style:font-family-complex="Arial" fo:font-size="12pt"/>
    </style:style>
    <style:style style:parent-style-name="852" style:family="paragraph" style:name="P83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60">
      <style:text-properties fo:color="#1f1f1f" fo:font-family="Arial" style:font-family-asian="Arial" style:font-family-complex="Arial" fo:font-size="12pt" fo:font-weight="bold"/>
    </style:style>
    <style:style style:family="paragraph" style:name="P83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61">
      <style:text-properties fo:color="#1f1f1f" fo:font-family="Arial" style:font-family-asian="Arial" style:font-family-complex="Arial" fo:font-size="12pt"/>
    </style:style>
    <style:style style:family="text" style:name="T1462">
      <style:text-properties fo:color="#1f1f1f" fo:font-family="Arial" style:font-family-asian="Arial" style:font-family-complex="Arial" fo:font-size="12pt"/>
    </style:style>
    <style:style style:parent-style-name="852" style:family="paragraph" style:name="P83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63">
      <style:text-properties fo:color="#1f1f1f" fo:font-family="Arial" style:font-family-asian="Arial" style:font-family-complex="Arial" fo:font-size="12pt" fo:font-weight="bold"/>
    </style:style>
    <style:style style:family="paragraph" style:name="P83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64">
      <style:text-properties fo:color="#1f1f1f" fo:font-family="Arial" style:font-family-asian="Arial" style:font-family-complex="Arial" fo:font-size="12pt"/>
    </style:style>
    <style:style style:family="text" style:name="T1465">
      <style:text-properties fo:color="#1f1f1f" fo:font-family="Arial" style:font-family-asian="Arial" style:font-family-complex="Arial" fo:font-size="12pt"/>
    </style:style>
    <style:style style:parent-style-name="851" style:family="paragraph" style:name="P83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66">
      <style:text-properties fo:color="#1f1f1f" fo:font-family="Arial" style:font-family-asian="Arial" style:font-family-complex="Arial" fo:font-size="14pt" fo:font-weight="bold"/>
    </style:style>
    <style:style style:parent-style-name="912" style:list-style-name="WWNum44" style:family="paragraph" style:name="P839">
      <style:paragraph-properties fo:line-height="115%" fo:margin-right="0cm" fo:margin-top="0pt" fo:margin-bottom="0pt" fo:border="none"/>
      <style:text-properties fo:font-family="Arial" style:font-family-asian="Arial" style:font-family-complex="Arial" fo:font-size="12pt"/>
    </style:style>
    <style:style style:family="text" style:name="T1467">
      <style:text-properties fo:color="#1f1f1f" fo:font-family="Arial" style:font-family-asian="Arial" style:font-family-complex="Arial" fo:font-size="12pt"/>
    </style:style>
    <style:style style:parent-style-name="912" style:list-style-name="WWNum44" style:family="paragraph" style:name="P840">
      <style:paragraph-properties fo:line-height="115%" fo:margin-right="0cm" fo:margin-top="0pt" fo:margin-bottom="0pt" fo:border="none"/>
      <style:text-properties fo:font-family="Arial" style:font-family-asian="Arial" style:font-family-complex="Arial" fo:font-size="12pt"/>
    </style:style>
    <style:style style:family="text" style:name="T1468">
      <style:text-properties fo:color="#1f1f1f" fo:font-family="Arial" style:font-family-asian="Arial" style:font-family-complex="Arial" fo:font-size="12pt"/>
    </style:style>
    <style:style style:parent-style-name="912" style:list-style-name="WWNum44" style:family="paragraph" style:name="P841">
      <style:paragraph-properties fo:line-height="115%" fo:margin-right="0cm" fo:margin-top="0pt" fo:margin-bottom="0pt" fo:border="none"/>
      <style:text-properties fo:font-family="Arial" style:font-family-asian="Arial" style:font-family-complex="Arial" fo:font-size="12pt"/>
    </style:style>
    <style:style style:family="text" style:name="T1469">
      <style:text-properties fo:color="#1f1f1f" fo:font-family="Arial" style:font-family-asian="Arial" style:font-family-complex="Arial" fo:font-size="12pt"/>
    </style:style>
    <style:style style:parent-style-name="912" style:list-style-name="WWNum44" style:family="paragraph" style:name="P842">
      <style:paragraph-properties fo:line-height="115%" fo:margin-right="0cm" fo:margin-top="0pt" fo:margin-bottom="0pt" fo:border="none"/>
      <style:text-properties fo:font-family="Arial" style:font-family-asian="Arial" style:font-family-complex="Arial" fo:font-size="12pt"/>
    </style:style>
    <style:style style:family="text" style:name="T1470">
      <style:text-properties fo:color="#1f1f1f" fo:font-family="Arial" style:font-family-asian="Arial" style:font-family-complex="Arial" fo:font-size="12pt"/>
    </style:style>
    <style:style style:family="paragraph" style:name="P843">
      <style:paragraph-properties/>
      <style:text-properties/>
    </style:style>
    <style:style style:parent-style-name="851" style:family="paragraph" style:name="P84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471">
      <style:text-properties fo:color="#1f1f1f" fo:font-family="Arial" style:font-family-asian="Arial" style:font-family-complex="Arial" fo:font-size="14pt" fo:font-weight="bold"/>
    </style:style>
    <style:style style:family="paragraph" style:name="P84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72">
      <style:text-properties fo:color="#1f1f1f" fo:font-family="Arial" style:font-family-asian="Arial" style:font-family-complex="Arial" fo:font-size="12pt"/>
    </style:style>
    <style:style style:parent-style-name="852" style:family="paragraph" style:name="P84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73">
      <style:text-properties fo:color="#1f1f1f" fo:font-family="Arial" style:font-family-asian="Arial" style:font-family-complex="Arial" fo:font-size="12pt" fo:font-weight="bold"/>
    </style:style>
    <style:style style:family="paragraph" style:name="P84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74">
      <style:text-properties fo:color="#1f1f1f" fo:font-family="Arial" style:font-family-asian="Arial" style:font-family-complex="Arial" fo:font-size="12pt"/>
    </style:style>
    <style:style style:parent-style-name="852" style:family="paragraph" style:name="P84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75">
      <style:text-properties fo:color="#1f1f1f" fo:font-family="Arial" style:font-family-asian="Arial" style:font-family-complex="Arial" fo:font-size="12pt" fo:font-weight="bold"/>
    </style:style>
    <style:style style:family="paragraph" style:name="P84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76">
      <style:text-properties fo:color="#1f1f1f" fo:font-family="Arial" style:font-family-asian="Arial" style:font-family-complex="Arial" fo:font-size="12pt"/>
    </style:style>
    <style:style style:parent-style-name="852" style:family="paragraph" style:name="P85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77">
      <style:text-properties fo:color="#1f1f1f" fo:font-family="Arial" style:font-family-asian="Arial" style:font-family-complex="Arial" fo:font-size="12pt" fo:font-weight="bold"/>
    </style:style>
    <style:style style:family="paragraph" style:name="P85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78">
      <style:text-properties fo:color="#1f1f1f" fo:font-family="Arial" style:font-family-asian="Arial" style:font-family-complex="Arial" fo:font-size="12pt"/>
    </style:style>
    <style:style style:parent-style-name="852" style:family="paragraph" style:name="P85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79">
      <style:text-properties fo:color="#1f1f1f" fo:font-family="Arial" style:font-family-asian="Arial" style:font-family-complex="Arial" fo:font-size="12pt" fo:font-weight="bold"/>
    </style:style>
    <style:style style:family="paragraph" style:name="P85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80">
      <style:text-properties fo:color="#1f1f1f" fo:font-family="Arial" style:font-family-asian="Arial" style:font-family-complex="Arial" fo:font-size="12pt"/>
    </style:style>
    <style:style style:parent-style-name="851" style:family="paragraph" style:name="P85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81">
      <style:text-properties fo:color="#1f1f1f" fo:font-family="Arial" style:font-family-asian="Arial" style:font-family-complex="Arial" fo:font-size="14pt" fo:font-weight="bold"/>
    </style:style>
    <style:style style:parent-style-name="912" style:list-style-name="WWNum45" style:family="paragraph" style:name="P855">
      <style:paragraph-properties fo:line-height="115%" fo:margin-right="0cm" fo:margin-top="0pt" fo:margin-bottom="0pt" fo:border="none"/>
      <style:text-properties fo:font-family="Arial" style:font-family-asian="Arial" style:font-family-complex="Arial" fo:font-size="12pt"/>
    </style:style>
    <style:style style:family="text" style:name="T1482">
      <style:text-properties fo:color="#1f1f1f" fo:font-family="Arial" style:font-family-asian="Arial" style:font-family-complex="Arial" fo:font-size="12pt"/>
    </style:style>
    <style:style style:parent-style-name="912" style:list-style-name="WWNum45" style:family="paragraph" style:name="P856">
      <style:paragraph-properties fo:line-height="115%" fo:margin-right="0cm" fo:margin-top="0pt" fo:margin-bottom="0pt" fo:border="none"/>
      <style:text-properties fo:font-family="Arial" style:font-family-asian="Arial" style:font-family-complex="Arial" fo:font-size="12pt"/>
    </style:style>
    <style:style style:family="text" style:name="T1483">
      <style:text-properties fo:color="#1f1f1f" fo:font-family="Arial" style:font-family-asian="Arial" style:font-family-complex="Arial" fo:font-size="12pt"/>
    </style:style>
    <style:style style:parent-style-name="912" style:list-style-name="WWNum45" style:family="paragraph" style:name="P857">
      <style:paragraph-properties fo:line-height="115%" fo:margin-right="0cm" fo:margin-top="0pt" fo:margin-bottom="0pt" fo:border="none"/>
      <style:text-properties fo:font-family="Arial" style:font-family-asian="Arial" style:font-family-complex="Arial" fo:font-size="12pt"/>
    </style:style>
    <style:style style:family="text" style:name="T1484">
      <style:text-properties fo:color="#1f1f1f" fo:font-family="Arial" style:font-family-asian="Arial" style:font-family-complex="Arial" fo:font-size="12pt"/>
    </style:style>
    <style:style style:parent-style-name="912" style:list-style-name="WWNum45" style:family="paragraph" style:name="P858">
      <style:paragraph-properties fo:line-height="115%" fo:margin-right="0cm" fo:margin-top="0pt" fo:margin-bottom="0pt" fo:border="none"/>
      <style:text-properties fo:font-family="Arial" style:font-family-asian="Arial" style:font-family-complex="Arial" fo:font-size="12pt"/>
    </style:style>
    <style:style style:family="text" style:name="T1485">
      <style:text-properties fo:color="#1f1f1f" fo:font-family="Arial" style:font-family-asian="Arial" style:font-family-complex="Arial" fo:font-size="12pt"/>
    </style:style>
    <style:style style:family="paragraph" style:name="P859">
      <style:paragraph-properties/>
      <style:text-properties/>
    </style:style>
    <style:style style:family="paragraph" style:name="P860">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486">
      <style:text-properties fo:color="#1f1f1f" fo:font-family="Arial" style:font-family-asian="Arial" style:font-family-complex="Arial" fo:font-size="12pt"/>
    </style:style>
    <style:style style:parent-style-name="851" style:family="paragraph" style:name="P86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87">
      <style:text-properties fo:color="#1f1f1f" fo:font-family="Arial" style:font-family-asian="Arial" style:font-family-complex="Arial" fo:font-size="14pt" fo:font-weight="bold"/>
    </style:style>
    <style:style style:family="paragraph" style:name="P86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88">
      <style:text-properties fo:color="#1f1f1f" fo:font-family="Arial" style:font-family-asian="Arial" style:font-family-complex="Arial" fo:font-size="12pt"/>
    </style:style>
    <style:style style:parent-style-name="852" style:family="paragraph" style:name="P86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89">
      <style:text-properties fo:color="#1f1f1f" fo:font-family="Arial" style:font-family-asian="Arial" style:font-family-complex="Arial" fo:font-size="12pt" fo:font-weight="bold"/>
    </style:style>
    <style:style style:family="paragraph" style:name="P86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90">
      <style:text-properties fo:color="#1f1f1f" fo:font-family="Arial" style:font-family-asian="Arial" style:font-family-complex="Arial" fo:font-size="12pt"/>
    </style:style>
    <style:style style:parent-style-name="852" style:family="paragraph" style:name="P86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91">
      <style:text-properties fo:color="#1f1f1f" fo:font-family="Arial" style:font-family-asian="Arial" style:font-family-complex="Arial" fo:font-size="12pt" fo:font-weight="bold"/>
    </style:style>
    <style:style style:family="paragraph" style:name="P86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92">
      <style:text-properties fo:color="#1f1f1f" fo:font-family="Arial" style:font-family-asian="Arial" style:font-family-complex="Arial" fo:font-size="12pt"/>
    </style:style>
    <style:style style:family="text" style:name="T1493">
      <style:text-properties fo:color="#1f1f1f" fo:font-family="Arial" style:font-family-asian="Arial" style:font-family-complex="Arial" fo:font-size="12pt"/>
    </style:style>
    <style:style style:parent-style-name="852" style:family="paragraph" style:name="P86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94">
      <style:text-properties fo:color="#1f1f1f" fo:font-family="Arial" style:font-family-asian="Arial" style:font-family-complex="Arial" fo:font-size="12pt" fo:font-weight="bold"/>
    </style:style>
    <style:style style:family="paragraph" style:name="P86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95">
      <style:text-properties fo:color="#1f1f1f" fo:font-family="Arial" style:font-family-asian="Arial" style:font-family-complex="Arial" fo:font-size="12pt"/>
    </style:style>
    <style:style style:family="text" style:name="T1496">
      <style:text-properties fo:color="#1f1f1f" fo:font-family="Arial" style:font-family-asian="Arial" style:font-family-complex="Arial" fo:font-size="12pt"/>
    </style:style>
    <style:style style:parent-style-name="852" style:family="paragraph" style:name="P86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497">
      <style:text-properties fo:color="#1f1f1f" fo:font-family="Arial" style:font-family-asian="Arial" style:font-family-complex="Arial" fo:font-size="12pt" fo:font-weight="bold"/>
    </style:style>
    <style:style style:family="paragraph" style:name="P87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498">
      <style:text-properties fo:color="#1f1f1f" fo:font-family="Arial" style:font-family-asian="Arial" style:font-family-complex="Arial" fo:font-size="12pt"/>
    </style:style>
    <style:style style:parent-style-name="851" style:family="paragraph" style:name="P87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99">
      <style:text-properties fo:color="#1f1f1f" fo:font-family="Arial" style:font-family-asian="Arial" style:font-family-complex="Arial" fo:font-size="14pt" fo:font-weight="bold"/>
    </style:style>
    <style:style style:parent-style-name="912" style:list-style-name="WWNum46" style:family="paragraph" style:name="P872">
      <style:paragraph-properties fo:line-height="115%" fo:margin-right="0cm" fo:margin-top="0pt" fo:margin-bottom="0pt" fo:border="none"/>
      <style:text-properties fo:font-family="Arial" style:font-family-asian="Arial" style:font-family-complex="Arial" fo:font-size="12pt"/>
    </style:style>
    <style:style style:family="text" style:name="T1500">
      <style:text-properties fo:color="#1f1f1f" fo:font-family="Arial" style:font-family-asian="Arial" style:font-family-complex="Arial" fo:font-size="12pt"/>
    </style:style>
    <style:style style:parent-style-name="912" style:list-style-name="WWNum46" style:family="paragraph" style:name="P873">
      <style:paragraph-properties fo:line-height="115%" fo:margin-right="0cm" fo:margin-top="0pt" fo:margin-bottom="0pt" fo:border="none"/>
      <style:text-properties fo:font-family="Arial" style:font-family-asian="Arial" style:font-family-complex="Arial" fo:font-size="12pt"/>
    </style:style>
    <style:style style:family="text" style:name="T1501">
      <style:text-properties fo:color="#1f1f1f" fo:font-family="Arial" style:font-family-asian="Arial" style:font-family-complex="Arial" fo:font-size="12pt"/>
    </style:style>
    <style:style style:parent-style-name="912" style:list-style-name="WWNum46" style:family="paragraph" style:name="P874">
      <style:paragraph-properties fo:line-height="115%" fo:margin-right="0cm" fo:margin-top="0pt" fo:margin-bottom="0pt" fo:border="none"/>
      <style:text-properties fo:font-family="Arial" style:font-family-asian="Arial" style:font-family-complex="Arial" fo:font-size="12pt"/>
    </style:style>
    <style:style style:family="text" style:name="T1502">
      <style:text-properties fo:color="#1f1f1f" fo:font-family="Arial" style:font-family-asian="Arial" style:font-family-complex="Arial" fo:font-size="12pt"/>
    </style:style>
    <style:style style:parent-style-name="912" style:list-style-name="WWNum46" style:family="paragraph" style:name="P875">
      <style:paragraph-properties fo:line-height="115%" fo:margin-right="0cm" fo:margin-top="0pt" fo:margin-bottom="0pt" fo:border="none"/>
      <style:text-properties fo:font-family="Arial" style:font-family-asian="Arial" style:font-family-complex="Arial" fo:font-size="12pt"/>
    </style:style>
    <style:style style:family="text" style:name="T1503">
      <style:text-properties fo:color="#1f1f1f" fo:font-family="Arial" style:font-family-asian="Arial" style:font-family-complex="Arial" fo:font-size="12pt"/>
    </style:style>
    <style:style style:family="paragraph" style:name="P876">
      <style:paragraph-properties/>
      <style:text-properties/>
    </style:style>
    <style:style style:family="paragraph" style:name="P87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504">
      <style:text-properties fo:color="#1f1f1f" fo:font-family="Arial" style:font-family-asian="Arial" style:font-family-complex="Arial" fo:font-size="12pt"/>
    </style:style>
    <style:style style:parent-style-name="851" style:family="paragraph" style:name="P87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05">
      <style:text-properties fo:color="#1f1f1f" fo:font-family="Arial" style:font-family-asian="Arial" style:font-family-complex="Arial" fo:font-size="14pt" fo:font-weight="bold"/>
    </style:style>
    <style:style style:family="paragraph" style:name="P87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06">
      <style:text-properties fo:color="#1f1f1f" fo:font-family="Arial" style:font-family-asian="Arial" style:font-family-complex="Arial" fo:font-size="12pt"/>
    </style:style>
    <style:style style:family="paragraph" style:name="P88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07">
      <style:text-properties fo:color="#1f1f1f" fo:font-family="Arial" style:font-family-asian="Arial" style:font-family-complex="Arial" fo:font-size="12pt"/>
    </style:style>
    <style:style style:family="text" style:name="T1508">
      <style:text-properties fo:color="#1f1f1f" fo:font-family="Arial" style:font-family-asian="Arial" style:font-family-complex="Arial" fo:font-size="12pt"/>
    </style:style>
    <style:style style:family="paragraph" style:name="P88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09">
      <style:text-properties fo:color="#1f1f1f" fo:font-family="Arial" style:font-family-asian="Arial" style:font-family-complex="Arial" fo:font-size="12pt"/>
    </style:style>
    <style:style style:family="text" style:name="T1510">
      <style:text-properties fo:color="#1f1f1f" fo:font-family="Arial" style:font-family-asian="Arial" style:font-family-complex="Arial" fo:font-size="12pt"/>
    </style:style>
    <style:style style:family="paragraph" style:name="P88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11">
      <style:text-properties fo:color="#1f1f1f" fo:font-family="Arial" style:font-family-asian="Arial" style:font-family-complex="Arial" fo:font-size="12pt"/>
    </style:style>
    <style:style style:family="text" style:name="T1512">
      <style:text-properties fo:color="#1f1f1f" fo:font-family="Arial" style:font-family-asian="Arial" style:font-family-complex="Arial" fo:font-size="12pt"/>
    </style:style>
    <style:style style:family="paragraph" style:name="P88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13">
      <style:text-properties fo:color="#1f1f1f" fo:font-family="Arial" style:font-family-asian="Arial" style:font-family-complex="Arial" fo:font-size="12pt"/>
    </style:style>
    <style:style style:parent-style-name="851" style:family="paragraph" style:name="P88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14">
      <style:text-properties fo:color="#1f1f1f" fo:font-family="Arial" style:font-family-asian="Arial" style:font-family-complex="Arial" fo:font-size="14pt" fo:font-weight="bold"/>
    </style:style>
    <style:style style:parent-style-name="912" style:list-style-name="WWNum47" style:family="paragraph" style:name="P885">
      <style:paragraph-properties fo:line-height="115%" fo:margin-right="0cm" fo:margin-top="0pt" fo:margin-bottom="0pt" fo:border="none"/>
      <style:text-properties fo:font-family="Arial" style:font-family-asian="Arial" style:font-family-complex="Arial" fo:font-size="12pt"/>
    </style:style>
    <style:style style:family="text" style:name="T1515">
      <style:text-properties fo:color="#1f1f1f" fo:font-family="Arial" style:font-family-asian="Arial" style:font-family-complex="Arial" fo:font-size="12pt"/>
    </style:style>
    <style:style style:parent-style-name="912" style:list-style-name="WWNum47" style:family="paragraph" style:name="P886">
      <style:paragraph-properties fo:line-height="115%" fo:margin-right="0cm" fo:margin-top="0pt" fo:margin-bottom="0pt" fo:border="none"/>
      <style:text-properties fo:font-family="Arial" style:font-family-asian="Arial" style:font-family-complex="Arial" fo:font-size="12pt"/>
    </style:style>
    <style:style style:family="text" style:name="T1516">
      <style:text-properties fo:color="#1f1f1f" fo:font-family="Arial" style:font-family-asian="Arial" style:font-family-complex="Arial" fo:font-size="12pt"/>
    </style:style>
    <style:style style:parent-style-name="912" style:list-style-name="WWNum47" style:family="paragraph" style:name="P887">
      <style:paragraph-properties fo:line-height="115%" fo:margin-right="0cm" fo:margin-top="0pt" fo:margin-bottom="0pt" fo:border="none"/>
      <style:text-properties fo:font-family="Arial" style:font-family-asian="Arial" style:font-family-complex="Arial" fo:font-size="12pt"/>
    </style:style>
    <style:style style:family="text" style:name="T1517">
      <style:text-properties fo:color="#1f1f1f" fo:font-family="Arial" style:font-family-asian="Arial" style:font-family-complex="Arial" fo:font-size="12pt"/>
    </style:style>
    <style:style style:parent-style-name="912" style:list-style-name="WWNum47" style:family="paragraph" style:name="P888">
      <style:paragraph-properties fo:line-height="115%" fo:margin-right="0cm" fo:margin-top="0pt" fo:margin-bottom="0pt" fo:border="none"/>
      <style:text-properties fo:font-family="Arial" style:font-family-asian="Arial" style:font-family-complex="Arial" fo:font-size="12pt"/>
    </style:style>
    <style:style style:family="text" style:name="T1518">
      <style:text-properties fo:color="#1f1f1f" fo:font-family="Arial" style:font-family-asian="Arial" style:font-family-complex="Arial" fo:font-size="12pt"/>
    </style:style>
    <style:style style:family="paragraph" style:name="P889">
      <style:paragraph-properties/>
      <style:text-properties/>
    </style:style>
    <style:style style:family="paragraph" style:name="P890">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519">
      <style:text-properties fo:color="#1f1f1f" fo:font-family="Arial" style:font-family-asian="Arial" style:font-family-complex="Arial" fo:font-size="12pt"/>
    </style:style>
    <style:style style:parent-style-name="851" style:family="paragraph" style:name="P89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20">
      <style:text-properties fo:color="#1f1f1f" fo:font-family="Arial" style:font-family-asian="Arial" style:font-family-complex="Arial" fo:font-size="14pt" fo:font-weight="bold"/>
    </style:style>
    <style:style style:family="paragraph" style:name="P89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21">
      <style:text-properties fo:color="#1f1f1f" fo:font-family="Arial" style:font-family-asian="Arial" style:font-family-complex="Arial" fo:font-size="12pt"/>
    </style:style>
    <style:style style:parent-style-name="852" style:family="paragraph" style:name="P89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22">
      <style:text-properties fo:color="#1f1f1f" fo:font-family="Arial" style:font-family-asian="Arial" style:font-family-complex="Arial" fo:font-size="12pt" fo:font-weight="bold"/>
    </style:style>
    <style:style style:family="paragraph" style:name="P89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23">
      <style:text-properties fo:color="#1f1f1f" fo:font-family="Arial" style:font-family-asian="Arial" style:font-family-complex="Arial" fo:font-size="12pt"/>
    </style:style>
    <style:style style:family="text" style:name="T1524">
      <style:text-properties fo:color="#1f1f1f" fo:font-family="Arial" style:font-family-asian="Arial" style:font-family-complex="Arial" fo:font-size="12pt"/>
    </style:style>
    <style:style style:parent-style-name="852" style:family="paragraph" style:name="P89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25">
      <style:text-properties fo:color="#1f1f1f" fo:font-family="Arial" style:font-family-asian="Arial" style:font-family-complex="Arial" fo:font-size="12pt" fo:font-weight="bold"/>
    </style:style>
    <style:style style:family="table" style:name="ta8">
      <style:paragraph-properties fo:line-height="100%" fo:margin-bottom="0pt"/>
      <style:table-properties style:width="11.01cm" fo:margin-left="0cm" table:align="left" style:use-optimal-column-width="true"/>
    </style:style>
    <style:style style:family="table-column" style:name="co21">
      <style:table-column-properties style:column-width="1.258cm" style:use-optimal-column-width="true"/>
    </style:style>
    <style:style style:family="table-column" style:name="co22">
      <style:table-column-properties style:column-width="4.713cm" style:use-optimal-column-width="true"/>
    </style:style>
    <style:style style:family="table-column" style:name="co23">
      <style:table-column-properties style:column-width="5.04cm" style:use-optimal-column-width="true"/>
    </style:style>
    <style:style style:family="table-row" style:name="ro26">
      <style:table-row-properties/>
    </style:style>
    <style:style style:family="table-cell" style:name="ce8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96">
      <style:paragraph-properties style:line-height-at-least="12pt" fo:margin-top="0pt" fo:margin-bottom="0pt"/>
      <style:text-properties/>
    </style:style>
    <style:style style:family="text" style:name="T1526">
      <style:text-properties fo:color="#1f1f1f" fo:font-family="Arial" style:font-family-asian="Arial" style:font-family-complex="Arial" fo:font-size="12pt" fo:font-weight="bold"/>
    </style:style>
    <style:style style:family="table-cell" style:name="ce8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97">
      <style:paragraph-properties style:line-height-at-least="12pt" fo:margin-top="0pt" fo:margin-bottom="0pt"/>
      <style:text-properties/>
    </style:style>
    <style:style style:family="text" style:name="T1527">
      <style:text-properties fo:color="#1f1f1f" fo:font-family="Arial" style:font-family-asian="Arial" style:font-family-complex="Arial" fo:font-size="12pt" fo:font-weight="bold"/>
    </style:style>
    <style:style style:family="table-cell" style:name="ce8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98">
      <style:paragraph-properties style:line-height-at-least="12pt" fo:margin-top="0pt" fo:margin-bottom="0pt"/>
      <style:text-properties/>
    </style:style>
    <style:style style:family="text" style:name="T1528">
      <style:text-properties fo:color="#1f1f1f" fo:font-family="Arial" style:font-family-asian="Arial" style:font-family-complex="Arial" fo:font-size="12pt" fo:font-weight="bold"/>
    </style:style>
    <style:style style:family="table-row" style:name="ro27">
      <style:table-row-properties/>
    </style:style>
    <style:style style:family="table-cell" style:name="ce8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99">
      <style:paragraph-properties style:line-height-at-least="12pt" fo:margin-top="0pt" fo:margin-bottom="0pt"/>
      <style:text-properties/>
    </style:style>
    <style:style style:family="text" style:name="T1529">
      <style:text-properties fo:color="#1f1f1f" fo:font-family="Arial" style:font-family-asian="Arial" style:font-family-complex="Arial" fo:font-size="12pt"/>
    </style:style>
    <style:style style:family="table-cell" style:name="ce8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00">
      <style:paragraph-properties style:line-height-at-least="12pt" fo:margin-top="0pt" fo:margin-bottom="0pt"/>
      <style:text-properties/>
    </style:style>
    <style:style style:family="text" style:name="T1530">
      <style:text-properties fo:color="#1f1f1f" fo:font-family="Arial" style:font-family-asian="Arial" style:font-family-complex="Arial" fo:font-size="12pt"/>
    </style:style>
    <style:style style:family="table-cell" style:name="ce8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01">
      <style:paragraph-properties style:line-height-at-least="12pt" fo:margin-top="0pt" fo:margin-bottom="0pt"/>
      <style:text-properties/>
    </style:style>
    <style:style style:family="text" style:name="T1531">
      <style:text-properties fo:color="#1f1f1f" fo:font-family="Arial" style:font-family-asian="Arial" style:font-family-complex="Arial" fo:font-size="12pt"/>
    </style:style>
    <style:style style:family="table-row" style:name="ro28">
      <style:table-row-properties/>
    </style:style>
    <style:style style:family="table-cell" style:name="ce8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02">
      <style:paragraph-properties style:line-height-at-least="12pt" fo:margin-top="0pt" fo:margin-bottom="0pt"/>
      <style:text-properties/>
    </style:style>
    <style:style style:family="text" style:name="T1532">
      <style:text-properties fo:color="#1f1f1f" fo:font-family="Arial" style:font-family-asian="Arial" style:font-family-complex="Arial" fo:font-size="12pt"/>
    </style:style>
    <style:style style:family="table-cell" style:name="ce8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03">
      <style:paragraph-properties style:line-height-at-least="12pt" fo:margin-top="0pt" fo:margin-bottom="0pt"/>
      <style:text-properties/>
    </style:style>
    <style:style style:family="text" style:name="T1533">
      <style:text-properties fo:color="#1f1f1f" fo:font-family="Arial" style:font-family-asian="Arial" style:font-family-complex="Arial" fo:font-size="12pt"/>
    </style:style>
    <style:style style:family="table-cell" style:name="ce8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04">
      <style:paragraph-properties style:line-height-at-least="12pt" fo:margin-top="0pt" fo:margin-bottom="0pt"/>
      <style:text-properties/>
    </style:style>
    <style:style style:family="text" style:name="T1534">
      <style:text-properties fo:color="#1f1f1f" fo:font-family="Arial" style:font-family-asian="Arial" style:font-family-complex="Arial" fo:font-size="12pt"/>
    </style:style>
    <style:style style:family="paragraph" style:name="P90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35">
      <style:text-properties fo:color="#1f1f1f" fo:font-family="Arial" style:font-family-asian="Arial" style:font-family-complex="Arial" fo:font-size="12pt"/>
    </style:style>
    <style:style style:parent-style-name="852" style:family="paragraph" style:name="P90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36">
      <style:text-properties fo:color="#1f1f1f" fo:font-family="Arial" style:font-family-asian="Arial" style:font-family-complex="Arial" fo:font-size="12pt" fo:font-weight="bold"/>
    </style:style>
    <style:style style:family="paragraph" style:name="P90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37">
      <style:text-properties fo:color="#1f1f1f" fo:font-family="Arial" style:font-family-asian="Arial" style:font-family-complex="Arial" fo:font-size="12pt"/>
    </style:style>
    <style:style style:family="text" style:name="T1538">
      <style:text-properties fo:color="#1f1f1f" fo:font-family="Arial" style:font-family-asian="Arial" style:font-family-complex="Arial" fo:font-size="12pt"/>
    </style:style>
    <style:style style:parent-style-name="852" style:family="paragraph" style:name="P90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39">
      <style:text-properties fo:color="#1f1f1f" fo:font-family="Arial" style:font-family-asian="Arial" style:font-family-complex="Arial" fo:font-size="12pt" fo:font-weight="bold"/>
    </style:style>
    <style:style style:family="paragraph" style:name="P90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40">
      <style:text-properties fo:color="#1f1f1f" fo:font-family="Arial" style:font-family-asian="Arial" style:font-family-complex="Arial" fo:font-size="12pt"/>
    </style:style>
    <style:style style:family="text" style:name="T1541">
      <style:text-properties fo:color="#1f1f1f" fo:font-family="Arial" style:font-family-asian="Arial" style:font-family-complex="Arial" fo:font-size="12pt"/>
    </style:style>
    <style:style style:parent-style-name="851" style:family="paragraph" style:name="P91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42">
      <style:text-properties fo:color="#1f1f1f" fo:font-family="Arial" style:font-family-asian="Arial" style:font-family-complex="Arial" fo:font-size="14pt" fo:font-weight="bold"/>
    </style:style>
    <style:style style:parent-style-name="912" style:list-style-name="WWNum48" style:family="paragraph" style:name="P911">
      <style:paragraph-properties fo:line-height="115%" fo:margin-right="0cm" fo:margin-top="0pt" fo:margin-bottom="0pt" fo:border="none"/>
      <style:text-properties fo:font-family="Arial" style:font-family-asian="Arial" style:font-family-complex="Arial" fo:font-size="12pt"/>
    </style:style>
    <style:style style:family="text" style:name="T1543">
      <style:text-properties fo:color="#1f1f1f" fo:font-family="Arial" style:font-family-asian="Arial" style:font-family-complex="Arial" fo:font-size="12pt"/>
    </style:style>
    <style:style style:parent-style-name="912" style:list-style-name="WWNum48" style:family="paragraph" style:name="P912">
      <style:paragraph-properties fo:line-height="115%" fo:margin-right="0cm" fo:margin-top="0pt" fo:margin-bottom="0pt" fo:border="none"/>
      <style:text-properties fo:font-family="Arial" style:font-family-asian="Arial" style:font-family-complex="Arial" fo:font-size="12pt"/>
    </style:style>
    <style:style style:family="text" style:name="T1544">
      <style:text-properties fo:color="#1f1f1f" fo:font-family="Arial" style:font-family-asian="Arial" style:font-family-complex="Arial" fo:font-size="12pt"/>
    </style:style>
    <style:style style:parent-style-name="912" style:list-style-name="WWNum48" style:family="paragraph" style:name="P913">
      <style:paragraph-properties fo:line-height="115%" fo:margin-right="0cm" fo:margin-top="0pt" fo:margin-bottom="0pt" fo:border="none"/>
      <style:text-properties fo:font-family="Arial" style:font-family-asian="Arial" style:font-family-complex="Arial" fo:font-size="12pt"/>
    </style:style>
    <style:style style:family="text" style:name="T1545">
      <style:text-properties fo:color="#1f1f1f" fo:font-family="Arial" style:font-family-asian="Arial" style:font-family-complex="Arial" fo:font-size="12pt"/>
    </style:style>
    <style:style style:parent-style-name="912" style:list-style-name="WWNum48" style:family="paragraph" style:name="P914">
      <style:paragraph-properties fo:line-height="115%" fo:margin-right="0cm" fo:margin-top="0pt" fo:margin-bottom="0pt" fo:border="none"/>
      <style:text-properties fo:font-family="Arial" style:font-family-asian="Arial" style:font-family-complex="Arial" fo:font-size="12pt"/>
    </style:style>
    <style:style style:family="text" style:name="T1546">
      <style:text-properties fo:color="#1f1f1f" fo:font-family="Arial" style:font-family-asian="Arial" style:font-family-complex="Arial" fo:font-size="12pt"/>
    </style:style>
    <style:style style:family="paragraph" style:name="P915">
      <style:paragraph-properties/>
      <style:text-properties/>
    </style:style>
    <style:style style:parent-style-name="851" style:family="paragraph" style:name="P91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547">
      <style:text-properties fo:color="#1f1f1f" fo:font-family="Arial" style:font-family-asian="Arial" style:font-family-complex="Arial" fo:font-size="14pt" fo:font-weight="bold"/>
    </style:style>
    <style:style style:family="paragraph" style:name="P91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48">
      <style:text-properties fo:color="#1f1f1f" fo:font-family="Arial" style:font-family-asian="Arial" style:font-family-complex="Arial" fo:font-size="12pt"/>
    </style:style>
    <style:style style:family="paragraph" style:name="P91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49">
      <style:text-properties fo:color="#1f1f1f" fo:font-family="Arial" style:font-family-asian="Arial" style:font-family-complex="Arial" fo:font-size="12pt"/>
    </style:style>
    <style:style style:family="paragraph" style:name="P9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50">
      <style:text-properties fo:color="#1f1f1f" fo:font-family="Arial" style:font-family-asian="Arial" style:font-family-complex="Arial" fo:font-size="12pt"/>
    </style:style>
    <style:style style:family="paragraph" style:name="P92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51">
      <style:text-properties fo:color="#1f1f1f" fo:font-family="Arial" style:font-family-asian="Arial" style:font-family-complex="Arial" fo:font-size="12pt"/>
    </style:style>
    <style:style style:family="paragraph" style:name="P9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52">
      <style:text-properties fo:color="#1f1f1f" fo:font-family="Arial" style:font-family-asian="Arial" style:font-family-complex="Arial" fo:font-size="12pt"/>
    </style:style>
    <style:style style:parent-style-name="851" style:family="paragraph" style:name="P92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53">
      <style:text-properties fo:color="#1f1f1f" fo:font-family="Arial" style:font-family-asian="Arial" style:font-family-complex="Arial" fo:font-size="14pt" fo:font-weight="bold"/>
    </style:style>
    <style:style style:parent-style-name="912" style:list-style-name="WWNum49" style:family="paragraph" style:name="P923">
      <style:paragraph-properties fo:line-height="115%" fo:margin-right="0cm" fo:margin-top="0pt" fo:margin-bottom="0pt" fo:border="none"/>
      <style:text-properties fo:font-family="Arial" style:font-family-asian="Arial" style:font-family-complex="Arial" fo:font-size="12pt"/>
    </style:style>
    <style:style style:family="text" style:name="T1554">
      <style:text-properties fo:color="#1f1f1f" fo:font-family="Arial" style:font-family-asian="Arial" style:font-family-complex="Arial" fo:font-size="12pt"/>
    </style:style>
    <style:style style:parent-style-name="912" style:list-style-name="WWNum49" style:family="paragraph" style:name="P924">
      <style:paragraph-properties fo:line-height="115%" fo:margin-right="0cm" fo:margin-top="0pt" fo:margin-bottom="0pt" fo:border="none"/>
      <style:text-properties fo:font-family="Arial" style:font-family-asian="Arial" style:font-family-complex="Arial" fo:font-size="12pt"/>
    </style:style>
    <style:style style:family="text" style:name="T1555">
      <style:text-properties fo:color="#1f1f1f" fo:font-family="Arial" style:font-family-asian="Arial" style:font-family-complex="Arial" fo:font-size="12pt"/>
    </style:style>
    <style:style style:parent-style-name="912" style:list-style-name="WWNum49" style:family="paragraph" style:name="P925">
      <style:paragraph-properties fo:line-height="115%" fo:margin-right="0cm" fo:margin-top="0pt" fo:margin-bottom="0pt" fo:border="none"/>
      <style:text-properties fo:font-family="Arial" style:font-family-asian="Arial" style:font-family-complex="Arial" fo:font-size="12pt"/>
    </style:style>
    <style:style style:family="text" style:name="T1556">
      <style:text-properties fo:color="#1f1f1f" fo:font-family="Arial" style:font-family-asian="Arial" style:font-family-complex="Arial" fo:font-size="12pt"/>
    </style:style>
    <style:style style:parent-style-name="912" style:list-style-name="WWNum49" style:family="paragraph" style:name="P926">
      <style:paragraph-properties fo:line-height="115%" fo:margin-right="0cm" fo:margin-top="0pt" fo:margin-bottom="0pt" fo:border="none"/>
      <style:text-properties fo:font-family="Arial" style:font-family-asian="Arial" style:font-family-complex="Arial" fo:font-size="12pt"/>
    </style:style>
    <style:style style:family="text" style:name="T1557">
      <style:text-properties fo:color="#1f1f1f" fo:font-family="Arial" style:font-family-asian="Arial" style:font-family-complex="Arial" fo:font-size="12pt"/>
    </style:style>
    <style:style style:family="paragraph" style:name="P927">
      <style:paragraph-properties/>
      <style:text-properties/>
    </style:style>
    <style:style style:family="paragraph" style:name="P928">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558">
      <style:text-properties fo:color="#1f1f1f" fo:font-family="Arial" style:font-family-asian="Arial" style:font-family-complex="Arial" fo:font-size="12pt"/>
    </style:style>
    <style:style style:parent-style-name="851" style:family="paragraph" style:name="P92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59">
      <style:text-properties fo:color="#1f1f1f" fo:font-family="Arial" style:font-family-asian="Arial" style:font-family-complex="Arial" fo:font-size="14pt" fo:font-weight="bold"/>
    </style:style>
    <style:style style:family="paragraph" style:name="P93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60">
      <style:text-properties fo:color="#1f1f1f" fo:font-family="Arial" style:font-family-asian="Arial" style:font-family-complex="Arial" fo:font-size="12pt"/>
    </style:style>
    <style:style style:parent-style-name="852" style:family="paragraph" style:name="P93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61">
      <style:text-properties fo:color="#1f1f1f" fo:font-family="Arial" style:font-family-asian="Arial" style:font-family-complex="Arial" fo:font-size="12pt" fo:font-weight="bold"/>
    </style:style>
    <style:style style:family="paragraph" style:name="P93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62">
      <style:text-properties fo:color="#1f1f1f" fo:font-family="Arial" style:font-family-asian="Arial" style:font-family-complex="Arial" fo:font-size="12pt"/>
    </style:style>
    <style:style style:parent-style-name="852" style:family="paragraph" style:name="P93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63">
      <style:text-properties fo:color="#1f1f1f" fo:font-family="Arial" style:font-family-asian="Arial" style:font-family-complex="Arial" fo:font-size="12pt" fo:font-weight="bold"/>
    </style:style>
    <style:style style:family="paragraph" style:name="P93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64">
      <style:text-properties fo:color="#1f1f1f" fo:font-family="Arial" style:font-family-asian="Arial" style:font-family-complex="Arial" fo:font-size="12pt"/>
    </style:style>
    <style:style style:family="text" style:name="T1565">
      <style:text-properties fo:color="#1f1f1f" fo:font-family="Arial" style:font-family-asian="Arial" style:font-family-complex="Arial" fo:font-size="12pt"/>
    </style:style>
    <style:style style:parent-style-name="852" style:family="paragraph" style:name="P93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66">
      <style:text-properties fo:color="#1f1f1f" fo:font-family="Arial" style:font-family-asian="Arial" style:font-family-complex="Arial" fo:font-size="12pt" fo:font-weight="bold"/>
    </style:style>
    <style:style style:family="paragraph" style:name="P9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67">
      <style:text-properties fo:color="#1f1f1f" fo:font-family="Arial" style:font-family-asian="Arial" style:font-family-complex="Arial" fo:font-size="12pt"/>
    </style:style>
    <style:style style:parent-style-name="912" style:list-style-name="WWNum50" style:family="paragraph" style:name="P937">
      <style:paragraph-properties fo:line-height="115%" fo:margin-right="0cm" fo:margin-top="0pt" fo:margin-bottom="0pt" fo:border="none"/>
      <style:text-properties fo:font-family="Arial" style:font-family-asian="Arial" style:font-family-complex="Arial" fo:font-size="12pt"/>
    </style:style>
    <style:style style:family="text" style:name="T1568">
      <style:text-properties fo:color="#1f1f1f" fo:font-family="Arial" style:font-family-asian="Arial" style:font-family-complex="Arial" fo:font-size="12pt"/>
    </style:style>
    <style:style style:parent-style-name="912" style:list-style-name="WWNum50" style:family="paragraph" style:name="P938">
      <style:paragraph-properties fo:line-height="115%" fo:margin-right="0cm" fo:margin-top="0pt" fo:margin-bottom="0pt" fo:border="none"/>
      <style:text-properties fo:font-family="Arial" style:font-family-asian="Arial" style:font-family-complex="Arial" fo:font-size="12pt"/>
    </style:style>
    <style:style style:family="text" style:name="T1569">
      <style:text-properties fo:color="#1f1f1f" fo:font-family="Arial" style:font-family-asian="Arial" style:font-family-complex="Arial" fo:font-size="12pt"/>
    </style:style>
    <style:style style:parent-style-name="852" style:family="paragraph" style:name="P9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70">
      <style:text-properties fo:color="#1f1f1f" fo:font-family="Arial" style:font-family-asian="Arial" style:font-family-complex="Arial" fo:font-size="12pt" fo:font-weight="bold"/>
    </style:style>
    <style:style style:family="paragraph" style:name="P9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71">
      <style:text-properties fo:color="#1f1f1f" fo:font-family="Arial" style:font-family-asian="Arial" style:font-family-complex="Arial" fo:font-size="12pt"/>
    </style:style>
    <style:style style:family="table" style:name="ta9">
      <style:paragraph-properties fo:line-height="100%" fo:margin-bottom="0pt"/>
      <style:table-properties style:width="11.31cm" fo:margin-left="0cm" table:align="left" style:use-optimal-column-width="true"/>
    </style:style>
    <style:style style:family="table-column" style:name="co24">
      <style:table-column-properties style:column-width="1.692cm" style:use-optimal-column-width="true"/>
    </style:style>
    <style:style style:family="table-column" style:name="co25">
      <style:table-column-properties style:column-width="4.165cm" style:use-optimal-column-width="true"/>
    </style:style>
    <style:style style:family="table-column" style:name="co26">
      <style:table-column-properties style:column-width="5.458cm" style:use-optimal-column-width="true"/>
    </style:style>
    <style:style style:family="table-row" style:name="ro29">
      <style:table-row-properties/>
    </style:style>
    <style:style style:family="table-cell" style:name="ce9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1">
      <style:paragraph-properties style:line-height-at-least="12pt" fo:margin-top="0pt" fo:margin-bottom="0pt"/>
      <style:text-properties/>
    </style:style>
    <style:style style:family="text" style:name="T1572">
      <style:text-properties fo:color="#1f1f1f" fo:font-family="Arial" style:font-family-asian="Arial" style:font-family-complex="Arial" fo:font-size="12pt" fo:font-weight="bold"/>
    </style:style>
    <style:style style:family="table-cell" style:name="ce9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2">
      <style:paragraph-properties style:line-height-at-least="12pt" fo:margin-top="0pt" fo:margin-bottom="0pt"/>
      <style:text-properties/>
    </style:style>
    <style:style style:family="text" style:name="T1573">
      <style:text-properties fo:color="#1f1f1f" fo:font-family="Arial" style:font-family-asian="Arial" style:font-family-complex="Arial" fo:font-size="12pt" fo:font-weight="bold"/>
    </style:style>
    <style:style style:family="table-cell" style:name="ce9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3">
      <style:paragraph-properties style:line-height-at-least="12pt" fo:margin-top="0pt" fo:margin-bottom="0pt"/>
      <style:text-properties/>
    </style:style>
    <style:style style:family="text" style:name="T1574">
      <style:text-properties fo:color="#1f1f1f" fo:font-family="Arial" style:font-family-asian="Arial" style:font-family-complex="Arial" fo:font-size="12pt" fo:font-weight="bold"/>
    </style:style>
    <style:style style:family="table-row" style:name="ro30">
      <style:table-row-properties/>
    </style:style>
    <style:style style:family="table-cell" style:name="ce9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4">
      <style:paragraph-properties style:line-height-at-least="12pt" fo:margin-top="0pt" fo:margin-bottom="0pt"/>
      <style:text-properties/>
    </style:style>
    <style:style style:family="text" style:name="T1575">
      <style:text-properties fo:color="#1f1f1f" fo:font-family="Arial" style:font-family-asian="Arial" style:font-family-complex="Arial" fo:font-size="12pt"/>
    </style:style>
    <style:style style:family="table-cell" style:name="ce9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5">
      <style:paragraph-properties style:line-height-at-least="12pt" fo:margin-top="0pt" fo:margin-bottom="0pt"/>
      <style:text-properties/>
    </style:style>
    <style:style style:family="text" style:name="T1576">
      <style:text-properties fo:color="#1f1f1f" fo:font-family="Arial" style:font-family-asian="Arial" style:font-family-complex="Arial" fo:font-size="12pt"/>
    </style:style>
    <style:style style:family="table-cell" style:name="ce9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6">
      <style:paragraph-properties style:line-height-at-least="12pt" fo:margin-top="0pt" fo:margin-bottom="0pt"/>
      <style:text-properties/>
    </style:style>
    <style:style style:family="text" style:name="T1577">
      <style:text-properties fo:color="#1f1f1f" fo:font-family="Arial" style:font-family-asian="Arial" style:font-family-complex="Arial" fo:font-size="12pt"/>
    </style:style>
    <style:style style:family="table-row" style:name="ro31">
      <style:table-row-properties/>
    </style:style>
    <style:style style:family="table-cell" style:name="ce9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7">
      <style:paragraph-properties style:line-height-at-least="12pt" fo:margin-top="0pt" fo:margin-bottom="0pt"/>
      <style:text-properties/>
    </style:style>
    <style:style style:family="text" style:name="T1578">
      <style:text-properties fo:color="#1f1f1f" fo:font-family="Arial" style:font-family-asian="Arial" style:font-family-complex="Arial" fo:font-size="12pt"/>
    </style:style>
    <style:style style:family="table-cell" style:name="ce9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8">
      <style:paragraph-properties style:line-height-at-least="12pt" fo:margin-top="0pt" fo:margin-bottom="0pt"/>
      <style:text-properties/>
    </style:style>
    <style:style style:family="text" style:name="T1579">
      <style:text-properties fo:color="#1f1f1f" fo:font-family="Arial" style:font-family-asian="Arial" style:font-family-complex="Arial" fo:font-size="12pt"/>
    </style:style>
    <style:style style:family="table-cell" style:name="ce9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9">
      <style:paragraph-properties style:line-height-at-least="12pt" fo:margin-top="0pt" fo:margin-bottom="0pt"/>
      <style:text-properties/>
    </style:style>
    <style:style style:family="text" style:name="T1580">
      <style:text-properties fo:color="#1f1f1f" fo:font-family="Arial" style:font-family-asian="Arial" style:font-family-complex="Arial" fo:font-size="12pt"/>
    </style:style>
    <style:style style:family="paragraph" style:name="P95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81">
      <style:text-properties fo:color="#1f1f1f" fo:font-family="Arial" style:font-family-asian="Arial" style:font-family-complex="Arial" fo:font-size="12pt"/>
    </style:style>
    <style:style style:parent-style-name="851" style:family="paragraph" style:name="P95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82">
      <style:text-properties fo:color="#1f1f1f" fo:font-family="Arial" style:font-family-asian="Arial" style:font-family-complex="Arial" fo:font-size="14pt" fo:font-weight="bold"/>
    </style:style>
    <style:style style:parent-style-name="912" style:list-style-name="WWNum50" style:family="paragraph" style:name="P952">
      <style:paragraph-properties fo:line-height="115%" fo:margin-right="0cm" fo:margin-top="0pt" fo:margin-bottom="0pt" fo:border="none"/>
      <style:text-properties fo:font-family="Arial" style:font-family-asian="Arial" style:font-family-complex="Arial" fo:font-size="12pt"/>
    </style:style>
    <style:style style:family="text" style:name="T1583">
      <style:text-properties fo:color="#1f1f1f" fo:font-family="Arial" style:font-family-asian="Arial" style:font-family-complex="Arial" fo:font-size="12pt"/>
    </style:style>
    <style:style style:parent-style-name="912" style:list-style-name="WWNum50" style:family="paragraph" style:name="P953">
      <style:paragraph-properties fo:line-height="115%" fo:margin-right="0cm" fo:margin-top="0pt" fo:margin-bottom="0pt" fo:border="none"/>
      <style:text-properties fo:font-family="Arial" style:font-family-asian="Arial" style:font-family-complex="Arial" fo:font-size="12pt"/>
    </style:style>
    <style:style style:family="text" style:name="T1584">
      <style:text-properties fo:color="#1f1f1f" fo:font-family="Arial" style:font-family-asian="Arial" style:font-family-complex="Arial" fo:font-size="12pt"/>
    </style:style>
    <style:style style:parent-style-name="912" style:list-style-name="WWNum50" style:family="paragraph" style:name="P954">
      <style:paragraph-properties fo:line-height="115%" fo:margin-right="0cm" fo:margin-top="0pt" fo:margin-bottom="0pt" fo:border="none"/>
      <style:text-properties fo:font-family="Arial" style:font-family-asian="Arial" style:font-family-complex="Arial" fo:font-size="12pt"/>
    </style:style>
    <style:style style:family="text" style:name="T1585">
      <style:text-properties fo:color="#1f1f1f" fo:font-family="Arial" style:font-family-asian="Arial" style:font-family-complex="Arial" fo:font-size="12pt"/>
    </style:style>
    <style:style style:parent-style-name="912" style:list-style-name="WWNum50" style:family="paragraph" style:name="P955">
      <style:paragraph-properties fo:line-height="115%" fo:margin-right="0cm" fo:margin-top="0pt" fo:margin-bottom="0pt" fo:border="none"/>
      <style:text-properties fo:font-family="Arial" style:font-family-asian="Arial" style:font-family-complex="Arial" fo:font-size="12pt"/>
    </style:style>
    <style:style style:family="text" style:name="T1586">
      <style:text-properties fo:color="#1f1f1f" fo:font-family="Arial" style:font-family-asian="Arial" style:font-family-complex="Arial" fo:font-size="12pt"/>
    </style:style>
    <style:style style:family="paragraph" style:name="P956">
      <style:paragraph-properties/>
      <style:text-properties/>
    </style:style>
    <style:style style:family="paragraph" style:name="P95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587">
      <style:text-properties fo:color="#1f1f1f" fo:font-family="Arial" style:font-family-asian="Arial" style:font-family-complex="Arial" fo:font-size="12pt"/>
    </style:style>
    <style:style style:parent-style-name="851" style:family="paragraph" style:name="P95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88">
      <style:text-properties fo:color="#1f1f1f" fo:font-family="Arial" style:font-family-asian="Arial" style:font-family-complex="Arial" fo:font-size="14pt" fo:font-weight="bold"/>
    </style:style>
    <style:style style:family="paragraph" style:name="P95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89">
      <style:text-properties fo:color="#1f1f1f" fo:font-family="Arial" style:font-family-asian="Arial" style:font-family-complex="Arial" fo:font-size="12pt"/>
    </style:style>
    <style:style style:parent-style-name="852" style:family="paragraph" style:name="P96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90">
      <style:text-properties fo:color="#1f1f1f" fo:font-family="Arial" style:font-family-asian="Arial" style:font-family-complex="Arial" fo:font-size="12pt" fo:font-weight="bold"/>
    </style:style>
    <style:style style:family="paragraph" style:name="P96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91">
      <style:text-properties fo:color="#1f1f1f" fo:font-family="Arial" style:font-family-asian="Arial" style:font-family-complex="Arial" fo:font-size="12pt"/>
    </style:style>
    <style:style style:parent-style-name="852" style:family="paragraph" style:name="P96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92">
      <style:text-properties fo:color="#1f1f1f" fo:font-family="Arial" style:font-family-asian="Arial" style:font-family-complex="Arial" fo:font-size="12pt" fo:font-weight="bold"/>
    </style:style>
    <style:style style:family="paragraph" style:name="P96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93">
      <style:text-properties fo:color="#1f1f1f" fo:font-family="Arial" style:font-family-asian="Arial" style:font-family-complex="Arial" fo:font-size="12pt"/>
    </style:style>
    <style:style style:parent-style-name="852" style:family="paragraph" style:name="P96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94">
      <style:text-properties fo:color="#1f1f1f" fo:font-family="Arial" style:font-family-asian="Arial" style:font-family-complex="Arial" fo:font-size="12pt" fo:font-weight="bold"/>
    </style:style>
    <style:style style:family="paragraph" style:name="P96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95">
      <style:text-properties fo:color="#1f1f1f" fo:font-family="Arial" style:font-family-asian="Arial" style:font-family-complex="Arial" fo:font-size="12pt"/>
    </style:style>
    <style:style style:family="text" style:name="T1596">
      <style:text-properties fo:color="#1f1f1f" fo:font-family="Arial" style:font-family-asian="Arial" style:font-family-complex="Arial" fo:font-size="12pt"/>
    </style:style>
    <style:style style:parent-style-name="852" style:family="paragraph" style:name="P96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597">
      <style:text-properties fo:color="#1f1f1f" fo:font-family="Arial" style:font-family-asian="Arial" style:font-family-complex="Arial" fo:font-size="12pt" fo:font-weight="bold"/>
    </style:style>
    <style:style style:family="paragraph" style:name="P96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598">
      <style:text-properties fo:color="#1f1f1f" fo:font-family="Arial" style:font-family-asian="Arial" style:font-family-complex="Arial" fo:font-size="12pt"/>
    </style:style>
    <style:style style:parent-style-name="851" style:family="paragraph" style:name="P96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99">
      <style:text-properties fo:color="#1f1f1f" fo:font-family="Arial" style:font-family-asian="Arial" style:font-family-complex="Arial" fo:font-size="14pt" fo:font-weight="bold"/>
    </style:style>
    <style:style style:parent-style-name="912" style:list-style-name="WWNum51" style:family="paragraph" style:name="P969">
      <style:paragraph-properties fo:line-height="115%" fo:margin-right="0cm" fo:margin-top="0pt" fo:margin-bottom="0pt" fo:border="none"/>
      <style:text-properties fo:font-family="Arial" style:font-family-asian="Arial" style:font-family-complex="Arial" fo:font-size="12pt"/>
    </style:style>
    <style:style style:family="text" style:name="T1600">
      <style:text-properties fo:color="#1f1f1f" fo:font-family="Arial" style:font-family-asian="Arial" style:font-family-complex="Arial" fo:font-size="12pt"/>
    </style:style>
    <style:style style:parent-style-name="912" style:list-style-name="WWNum51" style:family="paragraph" style:name="P970">
      <style:paragraph-properties fo:line-height="115%" fo:margin-right="0cm" fo:margin-top="0pt" fo:margin-bottom="0pt" fo:border="none"/>
      <style:text-properties fo:font-family="Arial" style:font-family-asian="Arial" style:font-family-complex="Arial" fo:font-size="12pt"/>
    </style:style>
    <style:style style:family="text" style:name="T1601">
      <style:text-properties fo:color="#1f1f1f" fo:font-family="Arial" style:font-family-asian="Arial" style:font-family-complex="Arial" fo:font-size="12pt"/>
    </style:style>
    <style:style style:parent-style-name="912" style:list-style-name="WWNum51" style:family="paragraph" style:name="P971">
      <style:paragraph-properties fo:line-height="115%" fo:margin-right="0cm" fo:margin-top="0pt" fo:margin-bottom="0pt" fo:border="none"/>
      <style:text-properties fo:font-family="Arial" style:font-family-asian="Arial" style:font-family-complex="Arial" fo:font-size="12pt"/>
    </style:style>
    <style:style style:family="text" style:name="T1602">
      <style:text-properties fo:color="#1f1f1f" fo:font-family="Arial" style:font-family-asian="Arial" style:font-family-complex="Arial" fo:font-size="12pt"/>
    </style:style>
    <style:style style:parent-style-name="912" style:list-style-name="WWNum51" style:family="paragraph" style:name="P972">
      <style:paragraph-properties fo:line-height="115%" fo:margin-right="0cm" fo:margin-top="0pt" fo:margin-bottom="0pt" fo:border="none"/>
      <style:text-properties fo:font-family="Arial" style:font-family-asian="Arial" style:font-family-complex="Arial" fo:font-size="12pt"/>
    </style:style>
    <style:style style:family="text" style:name="T1603">
      <style:text-properties fo:color="#1f1f1f" fo:font-family="Arial" style:font-family-asian="Arial" style:font-family-complex="Arial" fo:font-size="12pt"/>
    </style:style>
    <style:style style:family="paragraph" style:name="P973">
      <style:paragraph-properties/>
      <style:text-properties/>
    </style:style>
    <style:style style:parent-style-name="851" style:family="paragraph" style:name="P97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604">
      <style:text-properties fo:color="#1f1f1f" fo:font-family="Arial" style:font-family-asian="Arial" style:font-family-complex="Arial" fo:font-size="14pt" fo:font-weight="bold"/>
    </style:style>
    <style:style style:family="paragraph" style:name="P97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05">
      <style:text-properties fo:color="#1f1f1f" fo:font-family="Arial" style:font-family-asian="Arial" style:font-family-complex="Arial" fo:font-size="12pt"/>
    </style:style>
    <style:style style:parent-style-name="852" style:family="paragraph" style:name="P97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06">
      <style:text-properties fo:color="#1f1f1f" fo:font-family="Arial" style:font-family-asian="Arial" style:font-family-complex="Arial" fo:font-size="12pt" fo:font-weight="bold"/>
    </style:style>
    <style:style style:family="paragraph" style:name="P97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07">
      <style:text-properties fo:color="#1f1f1f" fo:font-family="Arial" style:font-family-asian="Arial" style:font-family-complex="Arial" fo:font-size="12pt"/>
    </style:style>
    <style:style style:parent-style-name="852" style:family="paragraph" style:name="P97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08">
      <style:text-properties fo:color="#1f1f1f" fo:font-family="Arial" style:font-family-asian="Arial" style:font-family-complex="Arial" fo:font-size="12pt" fo:font-weight="bold"/>
    </style:style>
    <style:style style:family="paragraph" style:name="P97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09">
      <style:text-properties fo:color="#1f1f1f" fo:font-family="Arial" style:font-family-asian="Arial" style:font-family-complex="Arial" fo:font-size="12pt"/>
    </style:style>
    <style:style style:parent-style-name="852" style:family="paragraph" style:name="P98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10">
      <style:text-properties fo:color="#1f1f1f" fo:font-family="Arial" style:font-family-asian="Arial" style:font-family-complex="Arial" fo:font-size="12pt" fo:font-weight="bold"/>
    </style:style>
    <style:style style:family="paragraph" style:name="P98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11">
      <style:text-properties fo:color="#1f1f1f" fo:font-family="Arial" style:font-family-asian="Arial" style:font-family-complex="Arial" fo:font-size="12pt"/>
    </style:style>
    <style:style style:parent-style-name="852" style:family="paragraph" style:name="P98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12">
      <style:text-properties fo:color="#1f1f1f" fo:font-family="Arial" style:font-family-asian="Arial" style:font-family-complex="Arial" fo:font-size="12pt" fo:font-weight="bold"/>
    </style:style>
    <style:style style:family="paragraph" style:name="P98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13">
      <style:text-properties fo:color="#1f1f1f" fo:font-family="Arial" style:font-family-asian="Arial" style:font-family-complex="Arial" fo:font-size="12pt"/>
    </style:style>
    <style:style style:parent-style-name="851" style:family="paragraph" style:name="P98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14">
      <style:text-properties fo:color="#1f1f1f" fo:font-family="Arial" style:font-family-asian="Arial" style:font-family-complex="Arial" fo:font-size="14pt" fo:font-weight="bold"/>
    </style:style>
    <style:style style:parent-style-name="912" style:list-style-name="WWNum52" style:family="paragraph" style:name="P985">
      <style:paragraph-properties fo:line-height="115%" fo:margin-right="0cm" fo:margin-top="0pt" fo:margin-bottom="0pt" fo:border="none"/>
      <style:text-properties fo:font-family="Arial" style:font-family-asian="Arial" style:font-family-complex="Arial" fo:font-size="12pt"/>
    </style:style>
    <style:style style:family="text" style:name="T1615">
      <style:text-properties fo:color="#1f1f1f" fo:font-family="Arial" style:font-family-asian="Arial" style:font-family-complex="Arial" fo:font-size="12pt"/>
    </style:style>
    <style:style style:parent-style-name="912" style:list-style-name="WWNum52" style:family="paragraph" style:name="P986">
      <style:paragraph-properties fo:line-height="115%" fo:margin-right="0cm" fo:margin-top="0pt" fo:margin-bottom="0pt" fo:border="none"/>
      <style:text-properties fo:font-family="Arial" style:font-family-asian="Arial" style:font-family-complex="Arial" fo:font-size="12pt"/>
    </style:style>
    <style:style style:family="text" style:name="T1616">
      <style:text-properties fo:color="#1f1f1f" fo:font-family="Arial" style:font-family-asian="Arial" style:font-family-complex="Arial" fo:font-size="12pt"/>
    </style:style>
    <style:style style:parent-style-name="912" style:list-style-name="WWNum52" style:family="paragraph" style:name="P987">
      <style:paragraph-properties fo:line-height="115%" fo:margin-right="0cm" fo:margin-top="0pt" fo:margin-bottom="0pt" fo:border="none"/>
      <style:text-properties fo:font-family="Arial" style:font-family-asian="Arial" style:font-family-complex="Arial" fo:font-size="12pt"/>
    </style:style>
    <style:style style:family="text" style:name="T1617">
      <style:text-properties fo:color="#1f1f1f" fo:font-family="Arial" style:font-family-asian="Arial" style:font-family-complex="Arial" fo:font-size="12pt"/>
    </style:style>
    <style:style style:parent-style-name="912" style:list-style-name="WWNum52" style:family="paragraph" style:name="P988">
      <style:paragraph-properties fo:line-height="115%" fo:margin-right="0cm" fo:margin-top="0pt" fo:margin-bottom="0pt" fo:border="none"/>
      <style:text-properties fo:font-family="Arial" style:font-family-asian="Arial" style:font-family-complex="Arial" fo:font-size="12pt"/>
    </style:style>
    <style:style style:family="text" style:name="T1618">
      <style:text-properties fo:color="#1f1f1f" fo:font-family="Arial" style:font-family-asian="Arial" style:font-family-complex="Arial" fo:font-size="12pt"/>
    </style:style>
    <style:style style:family="paragraph" style:name="P989">
      <style:paragraph-properties/>
      <style:text-properties/>
    </style:style>
    <style:style style:family="paragraph" style:name="P990">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619">
      <style:text-properties fo:color="#1f1f1f" fo:font-family="Arial" style:font-family-asian="Arial" style:font-family-complex="Arial" fo:font-size="12pt"/>
    </style:style>
    <style:style style:parent-style-name="851" style:family="paragraph" style:name="P99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20">
      <style:text-properties fo:color="#1f1f1f" fo:font-family="Arial" style:font-family-asian="Arial" style:font-family-complex="Arial" fo:font-size="14pt" fo:font-weight="bold"/>
    </style:style>
    <style:style style:family="paragraph" style:name="P99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1">
      <style:text-properties fo:color="#1f1f1f" fo:font-family="Arial" style:font-family-asian="Arial" style:font-family-complex="Arial" fo:font-size="12pt"/>
    </style:style>
    <style:style style:parent-style-name="852" style:family="paragraph" style:name="P99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2">
      <style:text-properties fo:color="#1f1f1f" fo:font-family="Arial" style:font-family-asian="Arial" style:font-family-complex="Arial" fo:font-size="12pt" fo:font-weight="bold"/>
    </style:style>
    <style:style style:family="paragraph" style:name="P99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3">
      <style:text-properties fo:color="#1f1f1f" fo:font-family="Arial" style:font-family-asian="Arial" style:font-family-complex="Arial" fo:font-size="12pt"/>
    </style:style>
    <style:style style:parent-style-name="852" style:family="paragraph" style:name="P99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4">
      <style:text-properties fo:color="#1f1f1f" fo:font-family="Arial" style:font-family-asian="Arial" style:font-family-complex="Arial" fo:font-size="12pt" fo:font-weight="bold"/>
    </style:style>
    <style:style style:family="paragraph" style:name="P99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5">
      <style:text-properties fo:color="#1f1f1f" fo:font-family="Arial" style:font-family-asian="Arial" style:font-family-complex="Arial" fo:font-size="12pt"/>
    </style:style>
    <style:style style:parent-style-name="852" style:family="paragraph" style:name="P99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6">
      <style:text-properties fo:color="#1f1f1f" fo:font-family="Arial" style:font-family-asian="Arial" style:font-family-complex="Arial" fo:font-size="12pt" fo:font-weight="bold"/>
    </style:style>
    <style:style style:family="paragraph" style:name="P99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7">
      <style:text-properties fo:color="#1f1f1f" fo:font-family="Arial" style:font-family-asian="Arial" style:font-family-complex="Arial" fo:font-size="12pt"/>
    </style:style>
    <style:style style:parent-style-name="852" style:family="paragraph" style:name="P99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8">
      <style:text-properties fo:color="#1f1f1f" fo:font-family="Arial" style:font-family-asian="Arial" style:font-family-complex="Arial" fo:font-size="12pt" fo:font-weight="bold"/>
    </style:style>
    <style:style style:family="paragraph" style:name="P100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9">
      <style:text-properties fo:color="#1f1f1f" fo:font-family="Arial" style:font-family-asian="Arial" style:font-family-complex="Arial" fo:font-size="12pt"/>
    </style:style>
    <style:style style:parent-style-name="851" style:family="paragraph" style:name="P100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30">
      <style:text-properties fo:color="#1f1f1f" fo:font-family="Arial" style:font-family-asian="Arial" style:font-family-complex="Arial" fo:font-size="14pt" fo:font-weight="bold"/>
    </style:style>
    <style:style style:parent-style-name="912" style:list-style-name="WWNum53" style:family="paragraph" style:name="P1002">
      <style:paragraph-properties fo:line-height="115%" fo:margin-right="0cm" fo:margin-top="0pt" fo:margin-bottom="0pt" fo:border="none"/>
      <style:text-properties fo:font-family="Arial" style:font-family-asian="Arial" style:font-family-complex="Arial" fo:font-size="12pt"/>
    </style:style>
    <style:style style:family="text" style:name="T1631">
      <style:text-properties fo:color="#1f1f1f" fo:font-family="Arial" style:font-family-asian="Arial" style:font-family-complex="Arial" fo:font-size="12pt"/>
    </style:style>
    <style:style style:parent-style-name="912" style:list-style-name="WWNum53" style:family="paragraph" style:name="P1003">
      <style:paragraph-properties fo:line-height="115%" fo:margin-right="0cm" fo:margin-top="0pt" fo:margin-bottom="0pt" fo:border="none"/>
      <style:text-properties fo:font-family="Arial" style:font-family-asian="Arial" style:font-family-complex="Arial" fo:font-size="12pt"/>
    </style:style>
    <style:style style:family="text" style:name="T1632">
      <style:text-properties fo:color="#1f1f1f" fo:font-family="Arial" style:font-family-asian="Arial" style:font-family-complex="Arial" fo:font-size="12pt"/>
    </style:style>
    <style:style style:parent-style-name="912" style:list-style-name="WWNum53" style:family="paragraph" style:name="P1004">
      <style:paragraph-properties fo:line-height="115%" fo:margin-right="0cm" fo:margin-top="0pt" fo:margin-bottom="0pt" fo:border="none"/>
      <style:text-properties fo:font-family="Arial" style:font-family-asian="Arial" style:font-family-complex="Arial" fo:font-size="12pt"/>
    </style:style>
    <style:style style:family="text" style:name="T1633">
      <style:text-properties fo:color="#1f1f1f" fo:font-family="Arial" style:font-family-asian="Arial" style:font-family-complex="Arial" fo:font-size="12pt"/>
    </style:style>
    <style:style style:parent-style-name="912" style:list-style-name="WWNum53" style:family="paragraph" style:name="P1005">
      <style:paragraph-properties fo:line-height="115%" fo:margin-right="0cm" fo:margin-top="0pt" fo:margin-bottom="0pt" fo:border="none"/>
      <style:text-properties fo:font-family="Arial" style:font-family-asian="Arial" style:font-family-complex="Arial" fo:font-size="12pt"/>
    </style:style>
    <style:style style:family="text" style:name="T1634">
      <style:text-properties fo:color="#1f1f1f" fo:font-family="Arial" style:font-family-asian="Arial" style:font-family-complex="Arial" fo:font-size="12pt"/>
    </style:style>
    <style:style style:family="paragraph" style:name="P1006">
      <style:paragraph-properties/>
      <style:text-properties/>
    </style:style>
    <style:style style:parent-style-name="851" style:family="paragraph" style:name="P100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635">
      <style:text-properties fo:color="#1f1f1f" fo:font-family="Arial" style:font-family-asian="Arial" style:font-family-complex="Arial" fo:font-size="14pt" fo:font-weight="bold"/>
    </style:style>
    <style:style style:family="paragraph" style:name="P100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36">
      <style:text-properties fo:color="#1f1f1f" fo:font-family="Arial" style:font-family-asian="Arial" style:font-family-complex="Arial" fo:font-size="12pt"/>
    </style:style>
    <style:style style:parent-style-name="852" style:family="paragraph" style:name="P100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37">
      <style:text-properties fo:color="#1f1f1f" fo:font-family="Arial" style:font-family-asian="Arial" style:font-family-complex="Arial" fo:font-size="12pt" fo:font-weight="bold"/>
    </style:style>
    <style:style style:family="paragraph" style:name="P101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38">
      <style:text-properties fo:color="#1f1f1f" fo:font-family="Arial" style:font-family-asian="Arial" style:font-family-complex="Arial" fo:font-size="12pt"/>
    </style:style>
    <style:style style:family="text" style:name="T1639">
      <style:text-properties fo:color="#1f1f1f" fo:font-family="Arial" style:font-family-asian="Arial" style:font-family-complex="Arial" fo:font-size="12pt"/>
    </style:style>
    <style:style style:parent-style-name="852" style:family="paragraph" style:name="P101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40">
      <style:text-properties fo:color="#1f1f1f" fo:font-family="Arial" style:font-family-asian="Arial" style:font-family-complex="Arial" fo:font-size="12pt" fo:font-weight="bold"/>
    </style:style>
    <style:style style:family="paragraph" style:name="P101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41">
      <style:text-properties fo:color="#1f1f1f" fo:font-family="Arial" style:font-family-asian="Arial" style:font-family-complex="Arial" fo:font-size="12pt"/>
    </style:style>
    <style:style style:family="text" style:name="T1642">
      <style:text-properties fo:color="#1f1f1f" fo:font-family="Arial" style:font-family-asian="Arial" style:font-family-complex="Arial" fo:font-size="12pt"/>
    </style:style>
    <style:style style:parent-style-name="852" style:family="paragraph" style:name="P101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43">
      <style:text-properties fo:color="#1f1f1f" fo:font-family="Arial" style:font-family-asian="Arial" style:font-family-complex="Arial" fo:font-size="12pt" fo:font-weight="bold"/>
    </style:style>
    <style:style style:family="paragraph" style:name="P101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44">
      <style:text-properties fo:color="#1f1f1f" fo:font-family="Arial" style:font-family-asian="Arial" style:font-family-complex="Arial" fo:font-size="12pt"/>
    </style:style>
    <style:style style:family="text" style:name="T1645">
      <style:text-properties fo:color="#1f1f1f" fo:font-family="Arial" style:font-family-asian="Arial" style:font-family-complex="Arial" fo:font-size="12pt"/>
    </style:style>
    <style:style style:parent-style-name="852" style:family="paragraph" style:name="P101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46">
      <style:text-properties fo:color="#1f1f1f" fo:font-family="Arial" style:font-family-asian="Arial" style:font-family-complex="Arial" fo:font-size="12pt" fo:font-weight="bold"/>
    </style:style>
    <style:style style:family="paragraph" style:name="P101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47">
      <style:text-properties fo:color="#1f1f1f" fo:font-family="Arial" style:font-family-asian="Arial" style:font-family-complex="Arial" fo:font-size="12pt"/>
    </style:style>
    <style:style style:family="text" style:name="T1648">
      <style:text-properties fo:color="#1f1f1f" fo:font-family="Arial" style:font-family-asian="Arial" style:font-family-complex="Arial" fo:font-size="12pt"/>
    </style:style>
    <style:style style:parent-style-name="851" style:family="paragraph" style:name="P101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49">
      <style:text-properties fo:color="#1f1f1f" fo:font-family="Arial" style:font-family-asian="Arial" style:font-family-complex="Arial" fo:font-size="14pt" fo:font-weight="bold"/>
    </style:style>
    <style:style style:parent-style-name="912" style:list-style-name="WWNum54" style:family="paragraph" style:name="P1018">
      <style:paragraph-properties fo:line-height="115%" fo:margin-right="0cm" fo:margin-top="0pt" fo:margin-bottom="0pt" fo:border="none"/>
      <style:text-properties fo:font-family="Arial" style:font-family-asian="Arial" style:font-family-complex="Arial" fo:font-size="12pt"/>
    </style:style>
    <style:style style:family="text" style:name="T1650">
      <style:text-properties fo:color="#1f1f1f" fo:font-family="Arial" style:font-family-asian="Arial" style:font-family-complex="Arial" fo:font-size="12pt"/>
    </style:style>
    <style:style style:parent-style-name="912" style:list-style-name="WWNum54" style:family="paragraph" style:name="P1019">
      <style:paragraph-properties fo:line-height="115%" fo:margin-right="0cm" fo:margin-top="0pt" fo:margin-bottom="0pt" fo:border="none"/>
      <style:text-properties fo:font-family="Arial" style:font-family-asian="Arial" style:font-family-complex="Arial" fo:font-size="12pt"/>
    </style:style>
    <style:style style:family="text" style:name="T1651">
      <style:text-properties fo:color="#1f1f1f" fo:font-family="Arial" style:font-family-asian="Arial" style:font-family-complex="Arial" fo:font-size="12pt"/>
    </style:style>
    <style:style style:parent-style-name="912" style:list-style-name="WWNum54" style:family="paragraph" style:name="P1020">
      <style:paragraph-properties fo:line-height="115%" fo:margin-right="0cm" fo:margin-top="0pt" fo:margin-bottom="0pt" fo:border="none"/>
      <style:text-properties fo:font-family="Arial" style:font-family-asian="Arial" style:font-family-complex="Arial" fo:font-size="12pt"/>
    </style:style>
    <style:style style:family="text" style:name="T1652">
      <style:text-properties fo:color="#1f1f1f" fo:font-family="Arial" style:font-family-asian="Arial" style:font-family-complex="Arial" fo:font-size="12pt"/>
    </style:style>
    <style:style style:parent-style-name="912" style:list-style-name="WWNum54" style:family="paragraph" style:name="P1021">
      <style:paragraph-properties fo:line-height="115%" fo:margin-right="0cm" fo:margin-top="0pt" fo:margin-bottom="0pt" fo:border="none"/>
      <style:text-properties fo:font-family="Arial" style:font-family-asian="Arial" style:font-family-complex="Arial" fo:font-size="12pt"/>
    </style:style>
    <style:style style:family="text" style:name="T1653">
      <style:text-properties fo:color="#1f1f1f" fo:font-family="Arial" style:font-family-asian="Arial" style:font-family-complex="Arial" fo:font-size="12pt"/>
    </style:style>
    <style:style style:family="paragraph" style:name="P1022">
      <style:paragraph-properties/>
      <style:text-properties/>
    </style:style>
    <style:style style:parent-style-name="851" style:family="paragraph" style:name="P102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654">
      <style:text-properties fo:color="#1f1f1f" fo:font-family="Arial" style:font-family-asian="Arial" style:font-family-complex="Arial" fo:font-size="14pt" fo:font-weight="bold"/>
    </style:style>
    <style:style style:family="paragraph" style:name="P102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5">
      <style:text-properties fo:color="#1f1f1f" fo:font-family="Arial" style:font-family-asian="Arial" style:font-family-complex="Arial" fo:font-size="12pt"/>
    </style:style>
    <style:style style:parent-style-name="852" style:family="paragraph" style:name="P102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56">
      <style:text-properties fo:color="#1f1f1f" fo:font-family="Arial" style:font-family-asian="Arial" style:font-family-complex="Arial" fo:font-size="12pt" fo:font-weight="bold"/>
    </style:style>
    <style:style style:family="paragraph" style:name="P102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7">
      <style:text-properties fo:color="#1f1f1f" fo:font-family="Arial" style:font-family-asian="Arial" style:font-family-complex="Arial" fo:font-size="12pt"/>
    </style:style>
    <style:style style:parent-style-name="852" style:family="paragraph" style:name="P102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58">
      <style:text-properties fo:color="#1f1f1f" fo:font-family="Arial" style:font-family-asian="Arial" style:font-family-complex="Arial" fo:font-size="12pt" fo:font-weight="bold"/>
    </style:style>
    <style:style style:family="paragraph" style:name="P102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9">
      <style:text-properties fo:color="#1f1f1f" fo:font-family="Arial" style:font-family-asian="Arial" style:font-family-complex="Arial" fo:font-size="12pt"/>
    </style:style>
    <style:style style:parent-style-name="852" style:family="paragraph" style:name="P102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60">
      <style:text-properties fo:color="#1f1f1f" fo:font-family="Arial" style:font-family-asian="Arial" style:font-family-complex="Arial" fo:font-size="12pt" fo:font-weight="bold"/>
    </style:style>
    <style:style style:family="paragraph" style:name="P103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61">
      <style:text-properties fo:color="#1f1f1f" fo:font-family="Arial" style:font-family-asian="Arial" style:font-family-complex="Arial" fo:font-size="12pt"/>
    </style:style>
    <style:style style:parent-style-name="852" style:family="paragraph" style:name="P103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62">
      <style:text-properties fo:color="#1f1f1f" fo:font-family="Arial" style:font-family-asian="Arial" style:font-family-complex="Arial" fo:font-size="12pt" fo:font-weight="bold"/>
    </style:style>
    <style:style style:family="paragraph" style:name="P103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63">
      <style:text-properties fo:color="#1f1f1f" fo:font-family="Arial" style:font-family-asian="Arial" style:font-family-complex="Arial" fo:font-size="12pt"/>
    </style:style>
    <style:style style:parent-style-name="851" style:family="paragraph" style:name="P10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64">
      <style:text-properties fo:color="#1f1f1f" fo:font-family="Arial" style:font-family-asian="Arial" style:font-family-complex="Arial" fo:font-size="14pt" fo:font-weight="bold"/>
    </style:style>
    <style:style style:parent-style-name="912" style:list-style-name="WWNum55" style:family="paragraph" style:name="P1034">
      <style:paragraph-properties fo:line-height="115%" fo:margin-right="0cm" fo:margin-top="0pt" fo:margin-bottom="0pt" fo:border="none"/>
      <style:text-properties fo:font-family="Arial" style:font-family-asian="Arial" style:font-family-complex="Arial" fo:font-size="12pt"/>
    </style:style>
    <style:style style:family="text" style:name="T1665">
      <style:text-properties fo:color="#1f1f1f" fo:font-family="Arial" style:font-family-asian="Arial" style:font-family-complex="Arial" fo:font-size="12pt"/>
    </style:style>
    <style:style style:parent-style-name="912" style:list-style-name="WWNum55" style:family="paragraph" style:name="P1035">
      <style:paragraph-properties fo:line-height="115%" fo:margin-right="0cm" fo:margin-top="0pt" fo:margin-bottom="0pt" fo:border="none"/>
      <style:text-properties fo:font-family="Arial" style:font-family-asian="Arial" style:font-family-complex="Arial" fo:font-size="12pt"/>
    </style:style>
    <style:style style:family="text" style:name="T1666">
      <style:text-properties fo:color="#1f1f1f" fo:font-family="Arial" style:font-family-asian="Arial" style:font-family-complex="Arial" fo:font-size="12pt"/>
    </style:style>
    <style:style style:parent-style-name="912" style:list-style-name="WWNum55" style:family="paragraph" style:name="P1036">
      <style:paragraph-properties fo:line-height="115%" fo:margin-right="0cm" fo:margin-top="0pt" fo:margin-bottom="0pt" fo:border="none"/>
      <style:text-properties fo:font-family="Arial" style:font-family-asian="Arial" style:font-family-complex="Arial" fo:font-size="12pt"/>
    </style:style>
    <style:style style:family="text" style:name="T1667">
      <style:text-properties fo:color="#1f1f1f" fo:font-family="Arial" style:font-family-asian="Arial" style:font-family-complex="Arial" fo:font-size="12pt"/>
    </style:style>
    <style:style style:parent-style-name="912" style:list-style-name="WWNum55" style:family="paragraph" style:name="P1037">
      <style:paragraph-properties fo:line-height="115%" fo:margin-right="0cm" fo:margin-top="0pt" fo:margin-bottom="0pt" fo:border="none"/>
      <style:text-properties fo:font-family="Arial" style:font-family-asian="Arial" style:font-family-complex="Arial" fo:font-size="12pt"/>
    </style:style>
    <style:style style:family="text" style:name="T1668">
      <style:text-properties fo:color="#1f1f1f" fo:font-family="Arial" style:font-family-asian="Arial" style:font-family-complex="Arial" fo:font-size="12pt"/>
    </style:style>
    <style:style style:family="paragraph" style:name="P1038">
      <style:paragraph-properties/>
      <style:text-properties/>
    </style:style>
    <style:style style:family="paragraph" style:name="P1039">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669">
      <style:text-properties fo:color="#1f1f1f" fo:font-family="Arial" style:font-family-asian="Arial" style:font-family-complex="Arial" fo:font-size="12pt"/>
    </style:style>
    <style:style style:parent-style-name="851" style:family="paragraph" style:name="P104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70">
      <style:text-properties fo:color="#1f1f1f" fo:font-family="Arial" style:font-family-asian="Arial" style:font-family-complex="Arial" fo:font-size="14pt" fo:font-weight="bold"/>
    </style:style>
    <style:style style:family="paragraph" style:name="P104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1">
      <style:text-properties fo:color="#1f1f1f" fo:font-family="Arial" style:font-family-asian="Arial" style:font-family-complex="Arial" fo:font-size="12pt"/>
    </style:style>
    <style:style style:parent-style-name="852" style:family="paragraph" style:name="P104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72">
      <style:text-properties fo:color="#1f1f1f" fo:font-family="Arial" style:font-family-asian="Arial" style:font-family-complex="Arial" fo:font-size="12pt" fo:font-weight="bold"/>
    </style:style>
    <style:style style:family="paragraph" style:name="P104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3">
      <style:text-properties fo:color="#1f1f1f" fo:font-family="Arial" style:font-family-asian="Arial" style:font-family-complex="Arial" fo:font-size="12pt"/>
    </style:style>
    <style:style style:family="text" style:name="T1674">
      <style:text-properties fo:color="#1f1f1f" fo:font-family="Arial" style:font-family-asian="Arial" style:font-family-complex="Arial" fo:font-size="12pt"/>
    </style:style>
    <style:style style:parent-style-name="852" style:family="paragraph" style:name="P104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75">
      <style:text-properties fo:color="#1f1f1f" fo:font-family="Arial" style:font-family-asian="Arial" style:font-family-complex="Arial" fo:font-size="12pt" fo:font-weight="bold"/>
    </style:style>
    <style:style style:family="paragraph" style:name="P104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6">
      <style:text-properties fo:color="#1f1f1f" fo:font-family="Arial" style:font-family-asian="Arial" style:font-family-complex="Arial" fo:font-size="12pt"/>
    </style:style>
    <style:style style:parent-style-name="852" style:family="paragraph" style:name="P104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77">
      <style:text-properties fo:color="#1f1f1f" fo:font-family="Arial" style:font-family-asian="Arial" style:font-family-complex="Arial" fo:font-size="12pt" fo:font-weight="bold"/>
    </style:style>
    <style:style style:family="paragraph" style:name="P104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8">
      <style:text-properties fo:color="#1f1f1f" fo:font-family="Arial" style:font-family-asian="Arial" style:font-family-complex="Arial" fo:font-size="12pt"/>
    </style:style>
    <style:style style:parent-style-name="852" style:family="paragraph" style:name="P104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79">
      <style:text-properties fo:color="#1f1f1f" fo:font-family="Arial" style:font-family-asian="Arial" style:font-family-complex="Arial" fo:font-size="12pt" fo:font-weight="bold"/>
    </style:style>
    <style:style style:family="paragraph" style:name="P104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80">
      <style:text-properties fo:color="#1f1f1f" fo:font-family="Arial" style:font-family-asian="Arial" style:font-family-complex="Arial" fo:font-size="12pt"/>
    </style:style>
    <style:style style:parent-style-name="851" style:family="paragraph" style:name="P105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81">
      <style:text-properties fo:color="#1f1f1f" fo:font-family="Arial" style:font-family-asian="Arial" style:font-family-complex="Arial" fo:font-size="14pt" fo:font-weight="bold"/>
    </style:style>
    <style:style style:parent-style-name="912" style:list-style-name="WWNum56" style:family="paragraph" style:name="P1051">
      <style:paragraph-properties fo:line-height="115%" fo:margin-right="0cm" fo:margin-top="0pt" fo:margin-bottom="0pt" fo:border="none"/>
      <style:text-properties fo:font-family="Arial" style:font-family-asian="Arial" style:font-family-complex="Arial" fo:font-size="12pt"/>
    </style:style>
    <style:style style:family="text" style:name="T1682">
      <style:text-properties fo:color="#1f1f1f" fo:font-family="Arial" style:font-family-asian="Arial" style:font-family-complex="Arial" fo:font-size="12pt"/>
    </style:style>
    <style:style style:parent-style-name="912" style:list-style-name="WWNum56" style:family="paragraph" style:name="P1052">
      <style:paragraph-properties fo:line-height="115%" fo:margin-right="0cm" fo:margin-top="0pt" fo:margin-bottom="0pt" fo:border="none"/>
      <style:text-properties fo:font-family="Arial" style:font-family-asian="Arial" style:font-family-complex="Arial" fo:font-size="12pt"/>
    </style:style>
    <style:style style:family="text" style:name="T1683">
      <style:text-properties fo:color="#1f1f1f" fo:font-family="Arial" style:font-family-asian="Arial" style:font-family-complex="Arial" fo:font-size="12pt"/>
    </style:style>
    <style:style style:parent-style-name="912" style:list-style-name="WWNum56" style:family="paragraph" style:name="P1053">
      <style:paragraph-properties fo:line-height="115%" fo:margin-right="0cm" fo:margin-top="0pt" fo:margin-bottom="0pt" fo:border="none"/>
      <style:text-properties fo:font-family="Arial" style:font-family-asian="Arial" style:font-family-complex="Arial" fo:font-size="12pt"/>
    </style:style>
    <style:style style:family="text" style:name="T1684">
      <style:text-properties fo:color="#1f1f1f" fo:font-family="Arial" style:font-family-asian="Arial" style:font-family-complex="Arial" fo:font-size="12pt"/>
    </style:style>
    <style:style style:parent-style-name="912" style:list-style-name="WWNum56" style:family="paragraph" style:name="P1054">
      <style:paragraph-properties fo:line-height="115%" fo:margin-right="0cm" fo:margin-top="0pt" fo:margin-bottom="0pt" fo:border="none"/>
      <style:text-properties fo:font-family="Arial" style:font-family-asian="Arial" style:font-family-complex="Arial" fo:font-size="12pt"/>
    </style:style>
    <style:style style:family="text" style:name="T1685">
      <style:text-properties fo:color="#1f1f1f" fo:font-family="Arial" style:font-family-asian="Arial" style:font-family-complex="Arial" fo:font-size="12pt"/>
    </style:style>
    <style:style style:family="paragraph" style:name="P1055">
      <style:paragraph-properties/>
      <style:text-properties/>
    </style:style>
    <style:style style:family="paragraph" style:name="P1056">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686">
      <style:text-properties fo:color="#1f1f1f" fo:font-family="Arial" style:font-family-asian="Arial" style:font-family-complex="Arial" fo:font-size="12pt"/>
    </style:style>
    <style:style style:parent-style-name="851" style:family="paragraph" style:name="P105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87">
      <style:text-properties fo:color="#1f1f1f" fo:font-family="Arial" style:font-family-asian="Arial" style:font-family-complex="Arial" fo:font-size="14pt" fo:font-weight="bold"/>
    </style:style>
    <style:style style:family="paragraph" style:name="P105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88">
      <style:text-properties fo:color="#1f1f1f" fo:font-family="Arial" style:font-family-asian="Arial" style:font-family-complex="Arial" fo:font-size="12pt"/>
    </style:style>
    <style:style style:family="paragraph" style:name="P105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89">
      <style:text-properties fo:color="#1f1f1f" fo:font-family="Arial" style:font-family-asian="Arial" style:font-family-complex="Arial" fo:font-size="12pt"/>
    </style:style>
    <style:style style:family="paragraph" style:name="P106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90">
      <style:text-properties fo:color="#1f1f1f" fo:font-family="Arial" style:font-family-asian="Arial" style:font-family-complex="Arial" fo:font-size="12pt"/>
    </style:style>
    <style:style style:family="paragraph" style:name="P106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91">
      <style:text-properties fo:color="#1f1f1f" fo:font-family="Arial" style:font-family-asian="Arial" style:font-family-complex="Arial" fo:font-size="12pt"/>
    </style:style>
    <style:style style:family="text" style:name="T1692">
      <style:text-properties fo:color="#1f1f1f" fo:font-family="Arial" style:font-family-asian="Arial" style:font-family-complex="Arial" fo:font-size="12pt"/>
    </style:style>
    <style:style style:family="paragraph" style:name="P106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93">
      <style:text-properties fo:color="#1f1f1f" fo:font-family="Arial" style:font-family-asian="Arial" style:font-family-complex="Arial" fo:font-size="12pt"/>
    </style:style>
    <style:style style:parent-style-name="851" style:family="paragraph" style:name="P106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94">
      <style:text-properties fo:color="#1f1f1f" fo:font-family="Arial" style:font-family-asian="Arial" style:font-family-complex="Arial" fo:font-size="14pt" fo:font-weight="bold"/>
    </style:style>
    <style:style style:parent-style-name="912" style:list-style-name="WWNum57" style:family="paragraph" style:name="P1064">
      <style:paragraph-properties fo:line-height="115%" fo:margin-right="0cm" fo:margin-top="0pt" fo:margin-bottom="0pt" fo:border="none"/>
      <style:text-properties fo:font-family="Arial" style:font-family-asian="Arial" style:font-family-complex="Arial" fo:font-size="12pt"/>
    </style:style>
    <style:style style:family="text" style:name="T1695">
      <style:text-properties fo:color="#1f1f1f" fo:font-family="Arial" style:font-family-asian="Arial" style:font-family-complex="Arial" fo:font-size="12pt"/>
    </style:style>
    <style:style style:parent-style-name="912" style:list-style-name="WWNum57" style:family="paragraph" style:name="P1065">
      <style:paragraph-properties fo:line-height="115%" fo:margin-right="0cm" fo:margin-top="0pt" fo:margin-bottom="0pt" fo:border="none"/>
      <style:text-properties fo:font-family="Arial" style:font-family-asian="Arial" style:font-family-complex="Arial" fo:font-size="12pt"/>
    </style:style>
    <style:style style:family="text" style:name="T1696">
      <style:text-properties fo:color="#1f1f1f" fo:font-family="Arial" style:font-family-asian="Arial" style:font-family-complex="Arial" fo:font-size="12pt"/>
    </style:style>
    <style:style style:parent-style-name="912" style:list-style-name="WWNum57" style:family="paragraph" style:name="P1066">
      <style:paragraph-properties fo:line-height="115%" fo:margin-right="0cm" fo:margin-top="0pt" fo:margin-bottom="0pt" fo:border="none"/>
      <style:text-properties fo:font-family="Arial" style:font-family-asian="Arial" style:font-family-complex="Arial" fo:font-size="12pt"/>
    </style:style>
    <style:style style:family="text" style:name="T1697">
      <style:text-properties fo:color="#1f1f1f" fo:font-family="Arial" style:font-family-asian="Arial" style:font-family-complex="Arial" fo:font-size="12pt"/>
    </style:style>
    <style:style style:parent-style-name="912" style:list-style-name="WWNum57" style:family="paragraph" style:name="P1067">
      <style:paragraph-properties fo:line-height="115%" fo:margin-right="0cm" fo:margin-top="0pt" fo:margin-bottom="0pt" fo:border="none"/>
      <style:text-properties fo:font-family="Arial" style:font-family-asian="Arial" style:font-family-complex="Arial" fo:font-size="12pt"/>
    </style:style>
    <style:style style:family="text" style:name="T1698">
      <style:text-properties fo:color="#1f1f1f" fo:font-family="Arial" style:font-family-asian="Arial" style:font-family-complex="Arial" fo:font-size="12pt"/>
    </style:style>
    <style:style style:family="paragraph" style:name="P1068">
      <style:paragraph-properties/>
      <style:text-properties/>
    </style:style>
    <style:style style:family="paragraph" style:name="P1069">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699">
      <style:text-properties fo:color="#1f1f1f" fo:font-family="Arial" style:font-family-asian="Arial" style:font-family-complex="Arial" fo:font-size="12pt"/>
    </style:style>
    <style:style style:parent-style-name="851" style:family="paragraph" style:name="P107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00">
      <style:text-properties fo:color="#1f1f1f" fo:font-family="Arial" style:font-family-asian="Arial" style:font-family-complex="Arial" fo:font-size="14pt" fo:font-weight="bold"/>
    </style:style>
    <style:style style:family="paragraph" style:name="P107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1">
      <style:text-properties fo:color="#1f1f1f" fo:font-family="Arial" style:font-family-asian="Arial" style:font-family-complex="Arial" fo:font-size="12pt"/>
    </style:style>
    <style:style style:parent-style-name="852" style:family="paragraph" style:name="P107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02">
      <style:text-properties fo:color="#1f1f1f" fo:font-family="Arial" style:font-family-asian="Arial" style:font-family-complex="Arial" fo:font-size="12pt" fo:font-weight="bold"/>
    </style:style>
    <style:style style:family="paragraph" style:name="P107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3">
      <style:text-properties fo:color="#1f1f1f" fo:font-family="Arial" style:font-family-asian="Arial" style:font-family-complex="Arial" fo:font-size="12pt"/>
    </style:style>
    <style:style style:parent-style-name="852" style:family="paragraph" style:name="P107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04">
      <style:text-properties fo:color="#1f1f1f" fo:font-family="Arial" style:font-family-asian="Arial" style:font-family-complex="Arial" fo:font-size="12pt" fo:font-weight="bold"/>
    </style:style>
    <style:style style:family="paragraph" style:name="P107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5">
      <style:text-properties fo:color="#1f1f1f" fo:font-family="Arial" style:font-family-asian="Arial" style:font-family-complex="Arial" fo:font-size="12pt"/>
    </style:style>
    <style:style style:parent-style-name="852" style:family="paragraph" style:name="P107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06">
      <style:text-properties fo:color="#1f1f1f" fo:font-family="Arial" style:font-family-asian="Arial" style:font-family-complex="Arial" fo:font-size="12pt" fo:font-weight="bold"/>
    </style:style>
    <style:style style:family="paragraph" style:name="P107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7">
      <style:text-properties fo:color="#1f1f1f" fo:font-family="Arial" style:font-family-asian="Arial" style:font-family-complex="Arial" fo:font-size="12pt"/>
    </style:style>
    <style:style style:parent-style-name="852" style:family="paragraph" style:name="P107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08">
      <style:text-properties fo:color="#1f1f1f" fo:font-family="Arial" style:font-family-asian="Arial" style:font-family-complex="Arial" fo:font-size="12pt" fo:font-weight="bold"/>
    </style:style>
    <style:style style:family="paragraph" style:name="P107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9">
      <style:text-properties fo:color="#1f1f1f" fo:font-family="Arial" style:font-family-asian="Arial" style:font-family-complex="Arial" fo:font-size="12pt"/>
    </style:style>
    <style:style style:parent-style-name="851" style:family="paragraph" style:name="P108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10">
      <style:text-properties fo:color="#1f1f1f" fo:font-family="Arial" style:font-family-asian="Arial" style:font-family-complex="Arial" fo:font-size="14pt" fo:font-weight="bold"/>
    </style:style>
    <style:style style:parent-style-name="912" style:list-style-name="WWNum58" style:family="paragraph" style:name="P1081">
      <style:paragraph-properties fo:line-height="115%" fo:margin-right="0cm" fo:margin-top="0pt" fo:margin-bottom="0pt" fo:border="none"/>
      <style:text-properties fo:font-family="Arial" style:font-family-asian="Arial" style:font-family-complex="Arial" fo:font-size="12pt"/>
    </style:style>
    <style:style style:family="text" style:name="T1711">
      <style:text-properties fo:color="#1f1f1f" fo:font-family="Arial" style:font-family-asian="Arial" style:font-family-complex="Arial" fo:font-size="12pt"/>
    </style:style>
    <style:style style:parent-style-name="912" style:list-style-name="WWNum58" style:family="paragraph" style:name="P1082">
      <style:paragraph-properties fo:line-height="115%" fo:margin-right="0cm" fo:margin-top="0pt" fo:margin-bottom="0pt" fo:border="none"/>
      <style:text-properties fo:font-family="Arial" style:font-family-asian="Arial" style:font-family-complex="Arial" fo:font-size="12pt"/>
    </style:style>
    <style:style style:family="text" style:name="T1712">
      <style:text-properties fo:color="#1f1f1f" fo:font-family="Arial" style:font-family-asian="Arial" style:font-family-complex="Arial" fo:font-size="12pt"/>
    </style:style>
    <style:style style:parent-style-name="912" style:list-style-name="WWNum58" style:family="paragraph" style:name="P1083">
      <style:paragraph-properties fo:line-height="115%" fo:margin-right="0cm" fo:margin-top="0pt" fo:margin-bottom="0pt" fo:border="none"/>
      <style:text-properties fo:font-family="Arial" style:font-family-asian="Arial" style:font-family-complex="Arial" fo:font-size="12pt"/>
    </style:style>
    <style:style style:family="text" style:name="T1713">
      <style:text-properties fo:color="#1f1f1f" fo:font-family="Arial" style:font-family-asian="Arial" style:font-family-complex="Arial" fo:font-size="12pt"/>
    </style:style>
    <style:style style:parent-style-name="912" style:list-style-name="WWNum58" style:family="paragraph" style:name="P1084">
      <style:paragraph-properties fo:line-height="115%" fo:margin-right="0cm" fo:margin-top="0pt" fo:margin-bottom="0pt" fo:border="none"/>
      <style:text-properties fo:font-family="Arial" style:font-family-asian="Arial" style:font-family-complex="Arial" fo:font-size="12pt"/>
    </style:style>
    <style:style style:family="text" style:name="T1714">
      <style:text-properties fo:color="#1f1f1f" fo:font-family="Arial" style:font-family-asian="Arial" style:font-family-complex="Arial" fo:font-size="12pt"/>
    </style:style>
    <style:style style:family="paragraph" style:name="P1085">
      <style:paragraph-properties/>
      <style:text-properties/>
    </style:style>
    <style:style style:parent-style-name="851" style:family="paragraph" style:name="P108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715">
      <style:text-properties fo:color="#1f1f1f" fo:font-family="Arial" style:font-family-asian="Arial" style:font-family-complex="Arial" fo:font-size="14pt" fo:font-weight="bold"/>
    </style:style>
    <style:style style:family="paragraph" style:name="P108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16">
      <style:text-properties fo:color="#1f1f1f" fo:font-family="Arial" style:font-family-asian="Arial" style:font-family-complex="Arial" fo:font-size="12pt"/>
    </style:style>
    <style:style style:family="paragraph" style:name="P108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17">
      <style:text-properties fo:color="#1f1f1f" fo:font-family="Arial" style:font-family-asian="Arial" style:font-family-complex="Arial" fo:font-size="12pt"/>
    </style:style>
    <style:style style:family="text" style:name="T1718">
      <style:text-properties fo:color="#1f1f1f" fo:font-family="Arial" style:font-family-asian="Arial" style:font-family-complex="Arial" fo:font-size="12pt"/>
    </style:style>
    <style:style style:family="paragraph" style:name="P108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19">
      <style:text-properties fo:color="#1f1f1f" fo:font-family="Arial" style:font-family-asian="Arial" style:font-family-complex="Arial" fo:font-size="12pt"/>
    </style:style>
    <style:style style:family="paragraph" style:name="P109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20">
      <style:text-properties fo:color="#1f1f1f" fo:font-family="Arial" style:font-family-asian="Arial" style:font-family-complex="Arial" fo:font-size="12pt"/>
    </style:style>
    <style:style style:family="paragraph" style:name="P109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21">
      <style:text-properties fo:color="#1f1f1f" fo:font-family="Arial" style:font-family-asian="Arial" style:font-family-complex="Arial" fo:font-size="12pt"/>
    </style:style>
    <style:style style:parent-style-name="851" style:family="paragraph" style:name="P109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22">
      <style:text-properties fo:color="#1f1f1f" fo:font-family="Arial" style:font-family-asian="Arial" style:font-family-complex="Arial" fo:font-size="14pt" fo:font-weight="bold"/>
    </style:style>
    <style:style style:parent-style-name="912" style:list-style-name="WWNum59" style:family="paragraph" style:name="P1093">
      <style:paragraph-properties fo:line-height="115%" fo:margin-right="0cm" fo:margin-top="0pt" fo:margin-bottom="0pt" fo:border="none"/>
      <style:text-properties fo:font-family="Arial" style:font-family-asian="Arial" style:font-family-complex="Arial" fo:font-size="12pt"/>
    </style:style>
    <style:style style:family="text" style:name="T1723">
      <style:text-properties fo:color="#1f1f1f" fo:font-family="Arial" style:font-family-asian="Arial" style:font-family-complex="Arial" fo:font-size="12pt"/>
    </style:style>
    <style:style style:parent-style-name="912" style:list-style-name="WWNum59" style:family="paragraph" style:name="P1094">
      <style:paragraph-properties fo:line-height="115%" fo:margin-right="0cm" fo:margin-top="0pt" fo:margin-bottom="0pt" fo:border="none"/>
      <style:text-properties fo:font-family="Arial" style:font-family-asian="Arial" style:font-family-complex="Arial" fo:font-size="12pt"/>
    </style:style>
    <style:style style:family="text" style:name="T1724">
      <style:text-properties fo:color="#1f1f1f" fo:font-family="Arial" style:font-family-asian="Arial" style:font-family-complex="Arial" fo:font-size="12pt"/>
    </style:style>
    <style:style style:parent-style-name="912" style:list-style-name="WWNum59" style:family="paragraph" style:name="P1095">
      <style:paragraph-properties fo:line-height="115%" fo:margin-right="0cm" fo:margin-top="0pt" fo:margin-bottom="0pt" fo:border="none"/>
      <style:text-properties fo:font-family="Arial" style:font-family-asian="Arial" style:font-family-complex="Arial" fo:font-size="12pt"/>
    </style:style>
    <style:style style:family="text" style:name="T1725">
      <style:text-properties fo:color="#1f1f1f" fo:font-family="Arial" style:font-family-asian="Arial" style:font-family-complex="Arial" fo:font-size="12pt"/>
    </style:style>
    <style:style style:parent-style-name="912" style:list-style-name="WWNum59" style:family="paragraph" style:name="P1096">
      <style:paragraph-properties fo:line-height="115%" fo:margin-right="0cm" fo:margin-top="0pt" fo:margin-bottom="0pt" fo:border="none"/>
      <style:text-properties fo:font-family="Arial" style:font-family-asian="Arial" style:font-family-complex="Arial" fo:font-size="12pt"/>
    </style:style>
    <style:style style:family="text" style:name="T1726">
      <style:text-properties fo:color="#1f1f1f" fo:font-family="Arial" style:font-family-asian="Arial" style:font-family-complex="Arial" fo:font-size="12pt"/>
    </style:style>
    <style:style style:family="paragraph" style:name="P1097">
      <style:paragraph-properties/>
      <style:text-properties/>
    </style:style>
    <style:style style:family="paragraph" style:name="P1098">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727">
      <style:text-properties fo:color="#1f1f1f" fo:font-family="Arial" style:font-family-asian="Arial" style:font-family-complex="Arial" fo:font-size="12pt"/>
    </style:style>
    <style:style style:parent-style-name="851" style:family="paragraph" style:name="P109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28">
      <style:text-properties fo:color="#1f1f1f" fo:font-family="Arial" style:font-family-asian="Arial" style:font-family-complex="Arial" fo:font-size="14pt" fo:font-weight="bold"/>
    </style:style>
    <style:style style:family="paragraph" style:name="P110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29">
      <style:text-properties fo:color="#1f1f1f" fo:font-family="Arial" style:font-family-asian="Arial" style:font-family-complex="Arial" fo:font-size="12pt"/>
    </style:style>
    <style:style style:parent-style-name="852" style:family="paragraph" style:name="P110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0">
      <style:text-properties fo:color="#1f1f1f" fo:font-family="Arial" style:font-family-asian="Arial" style:font-family-complex="Arial" fo:font-size="12pt" fo:font-weight="bold"/>
    </style:style>
    <style:style style:family="paragraph" style:name="P110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1">
      <style:text-properties fo:color="#1f1f1f" fo:font-family="Arial" style:font-family-asian="Arial" style:font-family-complex="Arial" fo:font-size="12pt"/>
    </style:style>
    <style:style style:parent-style-name="852" style:family="paragraph" style:name="P110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2">
      <style:text-properties fo:color="#1f1f1f" fo:font-family="Arial" style:font-family-asian="Arial" style:font-family-complex="Arial" fo:font-size="12pt" fo:font-weight="bold"/>
    </style:style>
    <style:style style:family="paragraph" style:name="P110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3">
      <style:text-properties fo:color="#1f1f1f" fo:font-family="Arial" style:font-family-asian="Arial" style:font-family-complex="Arial" fo:font-size="12pt"/>
    </style:style>
    <style:style style:parent-style-name="912" style:list-style-name="WWNum60" style:family="paragraph" style:name="P1105">
      <style:paragraph-properties fo:line-height="115%" fo:margin-right="0cm" fo:margin-top="0pt" fo:margin-bottom="0pt" fo:border="none"/>
      <style:text-properties fo:font-family="Arial" style:font-family-asian="Arial" style:font-family-complex="Arial" fo:font-size="12pt"/>
    </style:style>
    <style:style style:family="text" style:name="T1734">
      <style:text-properties fo:color="#1f1f1f" fo:font-family="Arial" style:font-family-asian="Arial" style:font-family-complex="Arial" fo:font-size="12pt"/>
    </style:style>
    <style:style style:parent-style-name="912" style:list-style-name="WWNum60" style:family="paragraph" style:name="P1106">
      <style:paragraph-properties fo:line-height="115%" fo:margin-right="0cm" fo:margin-top="0pt" fo:margin-bottom="0pt" fo:border="none"/>
      <style:text-properties fo:font-family="Arial" style:font-family-asian="Arial" style:font-family-complex="Arial" fo:font-size="12pt"/>
    </style:style>
    <style:style style:family="text" style:name="T1735">
      <style:text-properties fo:color="#1f1f1f" fo:font-family="Arial" style:font-family-asian="Arial" style:font-family-complex="Arial" fo:font-size="12pt"/>
    </style:style>
    <style:style style:parent-style-name="912" style:list-style-name="WWNum60" style:family="paragraph" style:name="P1107">
      <style:paragraph-properties fo:line-height="115%" fo:margin-right="0cm" fo:margin-top="0pt" fo:margin-bottom="0pt" fo:border="none"/>
      <style:text-properties fo:font-family="Arial" style:font-family-asian="Arial" style:font-family-complex="Arial" fo:font-size="12pt"/>
    </style:style>
    <style:style style:family="text" style:name="T1736">
      <style:text-properties fo:color="#1f1f1f" fo:font-family="Arial" style:font-family-asian="Arial" style:font-family-complex="Arial" fo:font-size="12pt"/>
    </style:style>
    <style:style style:parent-style-name="852" style:family="paragraph" style:name="P110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7">
      <style:text-properties fo:color="#1f1f1f" fo:font-family="Arial" style:font-family-asian="Arial" style:font-family-complex="Arial" fo:font-size="12pt" fo:font-weight="bold"/>
    </style:style>
    <style:style style:family="paragraph" style:name="P110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8">
      <style:text-properties fo:color="#1f1f1f" fo:font-family="Arial" style:font-family-asian="Arial" style:font-family-complex="Arial" fo:font-size="12pt"/>
    </style:style>
    <style:style style:parent-style-name="852" style:family="paragraph" style:name="P111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9">
      <style:text-properties fo:color="#1f1f1f" fo:font-family="Arial" style:font-family-asian="Arial" style:font-family-complex="Arial" fo:font-size="12pt" fo:font-weight="bold"/>
    </style:style>
    <style:style style:family="paragraph" style:name="P111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40">
      <style:text-properties fo:color="#1f1f1f" fo:font-family="Arial" style:font-family-asian="Arial" style:font-family-complex="Arial" fo:font-size="12pt"/>
    </style:style>
    <style:style style:parent-style-name="851" style:family="paragraph" style:name="P111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41">
      <style:text-properties fo:color="#1f1f1f" fo:font-family="Arial" style:font-family-asian="Arial" style:font-family-complex="Arial" fo:font-size="14pt" fo:font-weight="bold"/>
    </style:style>
    <style:style style:parent-style-name="912" style:list-style-name="WWNum60" style:family="paragraph" style:name="P1113">
      <style:paragraph-properties fo:line-height="115%" fo:margin-right="0cm" fo:margin-top="0pt" fo:margin-bottom="0pt" fo:border="none"/>
      <style:text-properties fo:font-family="Arial" style:font-family-asian="Arial" style:font-family-complex="Arial" fo:font-size="12pt"/>
    </style:style>
    <style:style style:family="text" style:name="T1742">
      <style:text-properties fo:color="#1f1f1f" fo:font-family="Arial" style:font-family-asian="Arial" style:font-family-complex="Arial" fo:font-size="12pt"/>
    </style:style>
    <style:style style:parent-style-name="912" style:list-style-name="WWNum60" style:family="paragraph" style:name="P1114">
      <style:paragraph-properties fo:line-height="115%" fo:margin-right="0cm" fo:margin-top="0pt" fo:margin-bottom="0pt" fo:border="none"/>
      <style:text-properties fo:font-family="Arial" style:font-family-asian="Arial" style:font-family-complex="Arial" fo:font-size="12pt"/>
    </style:style>
    <style:style style:family="text" style:name="T1743">
      <style:text-properties fo:color="#1f1f1f" fo:font-family="Arial" style:font-family-asian="Arial" style:font-family-complex="Arial" fo:font-size="12pt"/>
    </style:style>
    <style:style style:parent-style-name="912" style:list-style-name="WWNum60" style:family="paragraph" style:name="P1115">
      <style:paragraph-properties fo:line-height="115%" fo:margin-right="0cm" fo:margin-top="0pt" fo:margin-bottom="0pt" fo:border="none"/>
      <style:text-properties fo:font-family="Arial" style:font-family-asian="Arial" style:font-family-complex="Arial" fo:font-size="12pt"/>
    </style:style>
    <style:style style:family="text" style:name="T1744">
      <style:text-properties fo:color="#1f1f1f" fo:font-family="Arial" style:font-family-asian="Arial" style:font-family-complex="Arial" fo:font-size="12pt"/>
    </style:style>
    <style:style style:parent-style-name="912" style:list-style-name="WWNum60" style:family="paragraph" style:name="P1116">
      <style:paragraph-properties fo:line-height="115%" fo:margin-right="0cm" fo:margin-top="0pt" fo:margin-bottom="0pt" fo:border="none"/>
      <style:text-properties fo:font-family="Arial" style:font-family-asian="Arial" style:font-family-complex="Arial" fo:font-size="12pt"/>
    </style:style>
    <style:style style:family="text" style:name="T1745">
      <style:text-properties fo:color="#1f1f1f" fo:font-family="Arial" style:font-family-asian="Arial" style:font-family-complex="Arial" fo:font-size="12pt"/>
    </style:style>
    <style:style style:family="paragraph" style:name="P1117">
      <style:paragraph-properties/>
      <style:text-properties/>
    </style:style>
    <style:style style:parent-style-name="851" style:family="paragraph" style:name="P111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746">
      <style:text-properties fo:color="#1f1f1f" fo:font-family="Arial" style:font-family-asian="Arial" style:font-family-complex="Arial" fo:font-size="14pt" fo:font-weight="bold"/>
    </style:style>
    <style:style style:family="paragraph" style:name="P11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47">
      <style:text-properties fo:color="#1f1f1f" fo:font-family="Arial" style:font-family-asian="Arial" style:font-family-complex="Arial" fo:font-size="12pt"/>
    </style:style>
    <style:style style:parent-style-name="852" style:family="paragraph" style:name="P112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48">
      <style:text-properties fo:color="#1f1f1f" fo:font-family="Arial" style:font-family-asian="Arial" style:font-family-complex="Arial" fo:font-size="12pt" fo:font-weight="bold"/>
    </style:style>
    <style:style style:family="paragraph" style:name="P11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49">
      <style:text-properties fo:color="#1f1f1f" fo:font-family="Arial" style:font-family-asian="Arial" style:font-family-complex="Arial" fo:font-size="12pt"/>
    </style:style>
    <style:style style:parent-style-name="852" style:family="paragraph" style:name="P112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50">
      <style:text-properties fo:color="#1f1f1f" fo:font-family="Arial" style:font-family-asian="Arial" style:font-family-complex="Arial" fo:font-size="12pt" fo:font-weight="bold"/>
    </style:style>
    <style:style style:family="paragraph" style:name="P112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51">
      <style:text-properties fo:color="#1f1f1f" fo:font-family="Arial" style:font-family-asian="Arial" style:font-family-complex="Arial" fo:font-size="12pt"/>
    </style:style>
    <style:style style:parent-style-name="852" style:family="paragraph" style:name="P112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52">
      <style:text-properties fo:color="#1f1f1f" fo:font-family="Arial" style:font-family-asian="Arial" style:font-family-complex="Arial" fo:font-size="12pt" fo:font-weight="bold"/>
    </style:style>
    <style:style style:family="paragraph" style:name="P112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53">
      <style:text-properties fo:color="#1f1f1f" fo:font-family="Arial" style:font-family-asian="Arial" style:font-family-complex="Arial" fo:font-size="12pt"/>
    </style:style>
    <style:style style:parent-style-name="852" style:family="paragraph" style:name="P112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54">
      <style:text-properties fo:color="#1f1f1f" fo:font-family="Arial" style:font-family-asian="Arial" style:font-family-complex="Arial" fo:font-size="12pt" fo:font-weight="bold"/>
    </style:style>
    <style:style style:family="paragraph" style:name="P112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55">
      <style:text-properties fo:color="#1f1f1f" fo:font-family="Arial" style:font-family-asian="Arial" style:font-family-complex="Arial" fo:font-size="12pt"/>
    </style:style>
    <style:style style:parent-style-name="851" style:family="paragraph" style:name="P112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56">
      <style:text-properties fo:color="#1f1f1f" fo:font-family="Arial" style:font-family-asian="Arial" style:font-family-complex="Arial" fo:font-size="14pt" fo:font-weight="bold"/>
    </style:style>
    <style:style style:parent-style-name="912" style:list-style-name="WWNum61" style:family="paragraph" style:name="P1129">
      <style:paragraph-properties fo:line-height="115%" fo:margin-right="0cm" fo:margin-top="0pt" fo:margin-bottom="0pt" fo:border="none"/>
      <style:text-properties fo:font-family="Arial" style:font-family-asian="Arial" style:font-family-complex="Arial" fo:font-size="12pt"/>
    </style:style>
    <style:style style:family="text" style:name="T1757">
      <style:text-properties fo:color="#1f1f1f" fo:font-family="Arial" style:font-family-asian="Arial" style:font-family-complex="Arial" fo:font-size="12pt"/>
    </style:style>
    <style:style style:parent-style-name="912" style:list-style-name="WWNum61" style:family="paragraph" style:name="P1130">
      <style:paragraph-properties fo:line-height="115%" fo:margin-right="0cm" fo:margin-top="0pt" fo:margin-bottom="0pt" fo:border="none"/>
      <style:text-properties fo:font-family="Arial" style:font-family-asian="Arial" style:font-family-complex="Arial" fo:font-size="12pt"/>
    </style:style>
    <style:style style:family="text" style:name="T1758">
      <style:text-properties fo:color="#1f1f1f" fo:font-family="Arial" style:font-family-asian="Arial" style:font-family-complex="Arial" fo:font-size="12pt"/>
    </style:style>
    <style:style style:parent-style-name="912" style:list-style-name="WWNum61" style:family="paragraph" style:name="P1131">
      <style:paragraph-properties fo:line-height="115%" fo:margin-right="0cm" fo:margin-top="0pt" fo:margin-bottom="0pt" fo:border="none"/>
      <style:text-properties fo:font-family="Arial" style:font-family-asian="Arial" style:font-family-complex="Arial" fo:font-size="12pt"/>
    </style:style>
    <style:style style:family="text" style:name="T1759">
      <style:text-properties fo:color="#1f1f1f" fo:font-family="Arial" style:font-family-asian="Arial" style:font-family-complex="Arial" fo:font-size="12pt"/>
    </style:style>
    <style:style style:parent-style-name="912" style:list-style-name="WWNum61" style:family="paragraph" style:name="P1132">
      <style:paragraph-properties fo:line-height="115%" fo:margin-right="0cm" fo:margin-top="0pt" fo:margin-bottom="0pt" fo:border="none"/>
      <style:text-properties fo:font-family="Arial" style:font-family-asian="Arial" style:font-family-complex="Arial" fo:font-size="12pt"/>
    </style:style>
    <style:style style:family="text" style:name="T1760">
      <style:text-properties fo:color="#1f1f1f" fo:font-family="Arial" style:font-family-asian="Arial" style:font-family-complex="Arial" fo:font-size="12pt"/>
    </style:style>
    <style:style style:family="paragraph" style:name="P1133">
      <style:paragraph-properties/>
      <style:text-properties/>
    </style:style>
    <style:style style:family="paragraph" style:name="P1134">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761">
      <style:text-properties fo:color="#1f1f1f" fo:font-family="Arial" style:font-family-asian="Arial" style:font-family-complex="Arial" fo:font-size="12pt"/>
    </style:style>
    <style:style style:parent-style-name="851" style:family="paragraph" style:name="P113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62">
      <style:text-properties fo:color="#1f1f1f" fo:font-family="Arial" style:font-family-asian="Arial" style:font-family-complex="Arial" fo:font-size="14pt" fo:font-weight="bold"/>
    </style:style>
    <style:style style:family="paragraph" style:name="P11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3">
      <style:text-properties fo:color="#1f1f1f" fo:font-family="Arial" style:font-family-asian="Arial" style:font-family-complex="Arial" fo:font-size="12pt"/>
    </style:style>
    <style:style style:parent-style-name="852" style:family="paragraph" style:name="P113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64">
      <style:text-properties fo:color="#1f1f1f" fo:font-family="Arial" style:font-family-asian="Arial" style:font-family-complex="Arial" fo:font-size="12pt" fo:font-weight="bold"/>
    </style:style>
    <style:style style:family="paragraph" style:name="P113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5">
      <style:text-properties fo:color="#1f1f1f" fo:font-family="Arial" style:font-family-asian="Arial" style:font-family-complex="Arial" fo:font-size="12pt"/>
    </style:style>
    <style:style style:parent-style-name="852" style:family="paragraph" style:name="P11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66">
      <style:text-properties fo:color="#1f1f1f" fo:font-family="Arial" style:font-family-asian="Arial" style:font-family-complex="Arial" fo:font-size="12pt" fo:font-weight="bold"/>
    </style:style>
    <style:style style:family="paragraph" style:name="P11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7">
      <style:text-properties fo:color="#1f1f1f" fo:font-family="Arial" style:font-family-asian="Arial" style:font-family-complex="Arial" fo:font-size="12pt"/>
    </style:style>
    <style:style style:parent-style-name="852" style:family="paragraph" style:name="P114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68">
      <style:text-properties fo:color="#1f1f1f" fo:font-family="Arial" style:font-family-asian="Arial" style:font-family-complex="Arial" fo:font-size="12pt" fo:font-weight="bold"/>
    </style:style>
    <style:style style:family="paragraph" style:name="P114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9">
      <style:text-properties fo:color="#1f1f1f" fo:font-family="Arial" style:font-family-asian="Arial" style:font-family-complex="Arial" fo:font-size="12pt"/>
    </style:style>
    <style:style style:parent-style-name="852" style:family="paragraph" style:name="P114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70">
      <style:text-properties fo:color="#1f1f1f" fo:font-family="Arial" style:font-family-asian="Arial" style:font-family-complex="Arial" fo:font-size="12pt" fo:font-weight="bold"/>
    </style:style>
    <style:style style:family="paragraph" style:name="P114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71">
      <style:text-properties fo:color="#1f1f1f" fo:font-family="Arial" style:font-family-asian="Arial" style:font-family-complex="Arial" fo:font-size="12pt"/>
    </style:style>
    <style:style style:parent-style-name="851" style:family="paragraph" style:name="P114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72">
      <style:text-properties fo:color="#1f1f1f" fo:font-family="Arial" style:font-family-asian="Arial" style:font-family-complex="Arial" fo:font-size="14pt" fo:font-weight="bold"/>
    </style:style>
    <style:style style:parent-style-name="912" style:list-style-name="WWNum62" style:family="paragraph" style:name="P1146">
      <style:paragraph-properties fo:line-height="115%" fo:margin-right="0cm" fo:margin-top="0pt" fo:margin-bottom="0pt" fo:border="none"/>
      <style:text-properties fo:font-family="Arial" style:font-family-asian="Arial" style:font-family-complex="Arial" fo:font-size="12pt"/>
    </style:style>
    <style:style style:family="text" style:name="T1773">
      <style:text-properties fo:color="#1f1f1f" fo:font-family="Arial" style:font-family-asian="Arial" style:font-family-complex="Arial" fo:font-size="12pt"/>
    </style:style>
    <style:style style:parent-style-name="912" style:list-style-name="WWNum62" style:family="paragraph" style:name="P1147">
      <style:paragraph-properties fo:line-height="115%" fo:margin-right="0cm" fo:margin-top="0pt" fo:margin-bottom="0pt" fo:border="none"/>
      <style:text-properties fo:font-family="Arial" style:font-family-asian="Arial" style:font-family-complex="Arial" fo:font-size="12pt"/>
    </style:style>
    <style:style style:family="text" style:name="T1774">
      <style:text-properties fo:color="#1f1f1f" fo:font-family="Arial" style:font-family-asian="Arial" style:font-family-complex="Arial" fo:font-size="12pt"/>
    </style:style>
    <style:style style:parent-style-name="912" style:list-style-name="WWNum62" style:family="paragraph" style:name="P1148">
      <style:paragraph-properties fo:line-height="115%" fo:margin-right="0cm" fo:margin-top="0pt" fo:margin-bottom="0pt" fo:border="none"/>
      <style:text-properties fo:font-family="Arial" style:font-family-asian="Arial" style:font-family-complex="Arial" fo:font-size="12pt"/>
    </style:style>
    <style:style style:family="text" style:name="T1775">
      <style:text-properties fo:color="#1f1f1f" fo:font-family="Arial" style:font-family-asian="Arial" style:font-family-complex="Arial" fo:font-size="12pt"/>
    </style:style>
    <style:style style:parent-style-name="912" style:list-style-name="WWNum62" style:family="paragraph" style:name="P1149">
      <style:paragraph-properties fo:line-height="115%" fo:margin-right="0cm" fo:margin-top="0pt" fo:margin-bottom="0pt" fo:border="none"/>
      <style:text-properties fo:font-family="Arial" style:font-family-asian="Arial" style:font-family-complex="Arial" fo:font-size="12pt"/>
    </style:style>
    <style:style style:family="text" style:name="T1776">
      <style:text-properties fo:color="#1f1f1f" fo:font-family="Arial" style:font-family-asian="Arial" style:font-family-complex="Arial" fo:font-size="12pt"/>
    </style:style>
    <style:style style:family="paragraph" style:name="P1150">
      <style:paragraph-properties/>
      <style:text-properties/>
    </style:style>
    <style:style style:parent-style-name="851" style:family="paragraph" style:name="P115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777">
      <style:text-properties fo:color="#1f1f1f" fo:font-family="Arial" style:font-family-asian="Arial" style:font-family-complex="Arial" fo:font-size="14pt" fo:font-weight="bold"/>
    </style:style>
    <style:style style:family="paragraph" style:name="P115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78">
      <style:text-properties fo:color="#1f1f1f" fo:font-family="Arial" style:font-family-asian="Arial" style:font-family-complex="Arial" fo:font-size="12pt"/>
    </style:style>
    <style:style style:parent-style-name="852" style:family="paragraph" style:name="P115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79">
      <style:text-properties fo:color="#1f1f1f" fo:font-family="Arial" style:font-family-asian="Arial" style:font-family-complex="Arial" fo:font-size="12pt" fo:font-weight="bold"/>
    </style:style>
    <style:style style:family="paragraph" style:name="P115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0">
      <style:text-properties fo:color="#1f1f1f" fo:font-family="Arial" style:font-family-asian="Arial" style:font-family-complex="Arial" fo:font-size="12pt"/>
    </style:style>
    <style:style style:family="text" style:name="T1781">
      <style:text-properties fo:color="#1f1f1f" fo:font-family="Arial" style:font-family-asian="Arial" style:font-family-complex="Arial" fo:font-size="12pt"/>
    </style:style>
    <style:style style:parent-style-name="852" style:family="paragraph" style:name="P115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82">
      <style:text-properties fo:color="#1f1f1f" fo:font-family="Arial" style:font-family-asian="Arial" style:font-family-complex="Arial" fo:font-size="12pt" fo:font-weight="bold"/>
    </style:style>
    <style:style style:family="paragraph" style:name="P115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3">
      <style:text-properties fo:color="#1f1f1f" fo:font-family="Arial" style:font-family-asian="Arial" style:font-family-complex="Arial" fo:font-size="12pt"/>
    </style:style>
    <style:style style:family="text" style:name="T1784">
      <style:text-properties fo:color="#1f1f1f" fo:font-family="Arial" style:font-family-asian="Arial" style:font-family-complex="Arial" fo:font-size="12pt"/>
    </style:style>
    <style:style style:parent-style-name="852" style:family="paragraph" style:name="P115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85">
      <style:text-properties fo:color="#1f1f1f" fo:font-family="Arial" style:font-family-asian="Arial" style:font-family-complex="Arial" fo:font-size="12pt" fo:font-weight="bold"/>
    </style:style>
    <style:style style:family="paragraph" style:name="P115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6">
      <style:text-properties fo:color="#1f1f1f" fo:font-family="Arial" style:font-family-asian="Arial" style:font-family-complex="Arial" fo:font-size="12pt"/>
    </style:style>
    <style:style style:family="text" style:name="T1787">
      <style:text-properties fo:color="#1f1f1f" fo:font-family="Arial" style:font-family-asian="Arial" style:font-family-complex="Arial" fo:font-size="12pt"/>
    </style:style>
    <style:style style:parent-style-name="852" style:family="paragraph" style:name="P115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88">
      <style:text-properties fo:color="#1f1f1f" fo:font-family="Arial" style:font-family-asian="Arial" style:font-family-complex="Arial" fo:font-size="12pt" fo:font-weight="bold"/>
    </style:style>
    <style:style style:family="paragraph" style:name="P116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9">
      <style:text-properties fo:color="#1f1f1f" fo:font-family="Arial" style:font-family-asian="Arial" style:font-family-complex="Arial" fo:font-size="12pt"/>
    </style:style>
    <style:style style:family="text" style:name="T1790">
      <style:text-properties fo:color="#1f1f1f" fo:font-family="Arial" style:font-family-asian="Arial" style:font-family-complex="Arial" fo:font-size="12pt"/>
    </style:style>
    <style:style style:parent-style-name="851" style:family="paragraph" style:name="P116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91">
      <style:text-properties fo:color="#1f1f1f" fo:font-family="Arial" style:font-family-asian="Arial" style:font-family-complex="Arial" fo:font-size="14pt" fo:font-weight="bold"/>
    </style:style>
    <style:style style:parent-style-name="912" style:list-style-name="WWNum63" style:family="paragraph" style:name="P1162">
      <style:paragraph-properties fo:line-height="115%" fo:margin-right="0cm" fo:margin-top="0pt" fo:margin-bottom="0pt" fo:border="none"/>
      <style:text-properties fo:font-family="Arial" style:font-family-asian="Arial" style:font-family-complex="Arial" fo:font-size="12pt"/>
    </style:style>
    <style:style style:family="text" style:name="T1792">
      <style:text-properties fo:color="#1f1f1f" fo:font-family="Arial" style:font-family-asian="Arial" style:font-family-complex="Arial" fo:font-size="12pt"/>
    </style:style>
    <style:style style:parent-style-name="912" style:list-style-name="WWNum63" style:family="paragraph" style:name="P1163">
      <style:paragraph-properties fo:line-height="115%" fo:margin-right="0cm" fo:margin-top="0pt" fo:margin-bottom="0pt" fo:border="none"/>
      <style:text-properties fo:font-family="Arial" style:font-family-asian="Arial" style:font-family-complex="Arial" fo:font-size="12pt"/>
    </style:style>
    <style:style style:family="text" style:name="T1793">
      <style:text-properties fo:color="#1f1f1f" fo:font-family="Arial" style:font-family-asian="Arial" style:font-family-complex="Arial" fo:font-size="12pt"/>
    </style:style>
    <style:style style:parent-style-name="912" style:list-style-name="WWNum63" style:family="paragraph" style:name="P1164">
      <style:paragraph-properties fo:line-height="115%" fo:margin-right="0cm" fo:margin-top="0pt" fo:margin-bottom="0pt" fo:border="none"/>
      <style:text-properties fo:font-family="Arial" style:font-family-asian="Arial" style:font-family-complex="Arial" fo:font-size="12pt"/>
    </style:style>
    <style:style style:family="text" style:name="T1794">
      <style:text-properties fo:color="#1f1f1f" fo:font-family="Arial" style:font-family-asian="Arial" style:font-family-complex="Arial" fo:font-size="12pt"/>
    </style:style>
    <style:style style:parent-style-name="912" style:list-style-name="WWNum63" style:family="paragraph" style:name="P1165">
      <style:paragraph-properties fo:line-height="115%" fo:margin-right="0cm" fo:margin-top="0pt" fo:margin-bottom="0pt" fo:border="none"/>
      <style:text-properties fo:font-family="Arial" style:font-family-asian="Arial" style:font-family-complex="Arial" fo:font-size="12pt"/>
    </style:style>
    <style:style style:family="text" style:name="T1795">
      <style:text-properties fo:color="#1f1f1f" fo:font-family="Arial" style:font-family-asian="Arial" style:font-family-complex="Arial" fo:font-size="12pt"/>
    </style:style>
    <style:style style:family="paragraph" style:name="P1166">
      <style:paragraph-properties/>
      <style:text-properties/>
    </style:style>
    <style:style style:family="paragraph" style:name="P116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796">
      <style:text-properties fo:color="#1f1f1f" fo:font-family="Arial" style:font-family-asian="Arial" style:font-family-complex="Arial" fo:font-size="12pt"/>
    </style:style>
    <style:style style:parent-style-name="851" style:family="paragraph" style:name="P116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97">
      <style:text-properties fo:color="#1f1f1f" fo:font-family="Arial" style:font-family-asian="Arial" style:font-family-complex="Arial" fo:font-size="14pt" fo:font-weight="bold"/>
    </style:style>
    <style:style style:family="paragraph" style:name="P116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98">
      <style:text-properties fo:color="#1f1f1f" fo:font-family="Arial" style:font-family-asian="Arial" style:font-family-complex="Arial" fo:font-size="12pt"/>
    </style:style>
    <style:style style:parent-style-name="852" style:family="paragraph" style:name="P117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99">
      <style:text-properties fo:color="#1f1f1f" fo:font-family="Arial" style:font-family-asian="Arial" style:font-family-complex="Arial" fo:font-size="12pt" fo:font-weight="bold"/>
    </style:style>
    <style:style style:family="paragraph" style:name="P117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00">
      <style:text-properties fo:color="#1f1f1f" fo:font-family="Arial" style:font-family-asian="Arial" style:font-family-complex="Arial" fo:font-size="12pt"/>
    </style:style>
    <style:style style:family="text" style:name="T1801">
      <style:text-properties fo:color="#1f1f1f" fo:font-family="Arial" style:font-family-asian="Arial" style:font-family-complex="Arial" fo:font-size="12pt"/>
    </style:style>
    <style:style style:parent-style-name="852" style:family="paragraph" style:name="P117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02">
      <style:text-properties fo:color="#1f1f1f" fo:font-family="Arial" style:font-family-asian="Arial" style:font-family-complex="Arial" fo:font-size="12pt" fo:font-weight="bold"/>
    </style:style>
    <style:style style:family="paragraph" style:name="P117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03">
      <style:text-properties fo:color="#1f1f1f" fo:font-family="Arial" style:font-family-asian="Arial" style:font-family-complex="Arial" fo:font-size="12pt"/>
    </style:style>
    <style:style style:family="text" style:name="T1804">
      <style:text-properties fo:color="#1f1f1f" fo:font-family="Arial" style:font-family-asian="Arial" style:font-family-complex="Arial" fo:font-size="12pt"/>
    </style:style>
    <style:style style:parent-style-name="852" style:family="paragraph" style:name="P117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05">
      <style:text-properties fo:color="#1f1f1f" fo:font-family="Arial" style:font-family-asian="Arial" style:font-family-complex="Arial" fo:font-size="12pt" fo:font-weight="bold"/>
    </style:style>
    <style:style style:family="paragraph" style:name="P117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06">
      <style:text-properties fo:color="#1f1f1f" fo:font-family="Arial" style:font-family-asian="Arial" style:font-family-complex="Arial" fo:font-size="12pt"/>
    </style:style>
    <style:style style:family="text" style:name="T1807">
      <style:text-properties fo:color="#1f1f1f" fo:font-family="Arial" style:font-family-asian="Arial" style:font-family-complex="Arial" fo:font-size="12pt"/>
    </style:style>
    <style:style style:parent-style-name="852" style:family="paragraph" style:name="P117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08">
      <style:text-properties fo:color="#1f1f1f" fo:font-family="Arial" style:font-family-asian="Arial" style:font-family-complex="Arial" fo:font-size="12pt" fo:font-weight="bold"/>
    </style:style>
    <style:style style:family="paragraph" style:name="P117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09">
      <style:text-properties fo:color="#1f1f1f" fo:font-family="Arial" style:font-family-asian="Arial" style:font-family-complex="Arial" fo:font-size="12pt"/>
    </style:style>
    <style:style style:family="text" style:name="T1810">
      <style:text-properties fo:color="#1f1f1f" fo:font-family="Arial" style:font-family-asian="Arial" style:font-family-complex="Arial" fo:font-size="12pt"/>
    </style:style>
    <style:style style:parent-style-name="851" style:family="paragraph" style:name="P117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11">
      <style:text-properties fo:color="#1f1f1f" fo:font-family="Arial" style:font-family-asian="Arial" style:font-family-complex="Arial" fo:font-size="14pt" fo:font-weight="bold"/>
    </style:style>
    <style:style style:parent-style-name="912" style:list-style-name="WWNum64" style:family="paragraph" style:name="P1179">
      <style:paragraph-properties fo:line-height="115%" fo:margin-right="0cm" fo:margin-top="0pt" fo:margin-bottom="0pt" fo:border="none"/>
      <style:text-properties fo:font-family="Arial" style:font-family-asian="Arial" style:font-family-complex="Arial" fo:font-size="12pt"/>
    </style:style>
    <style:style style:family="text" style:name="T1812">
      <style:text-properties fo:color="#1f1f1f" fo:font-family="Arial" style:font-family-asian="Arial" style:font-family-complex="Arial" fo:font-size="12pt"/>
    </style:style>
    <style:style style:parent-style-name="912" style:list-style-name="WWNum64" style:family="paragraph" style:name="P1180">
      <style:paragraph-properties fo:line-height="115%" fo:margin-right="0cm" fo:margin-top="0pt" fo:margin-bottom="0pt" fo:border="none"/>
      <style:text-properties fo:font-family="Arial" style:font-family-asian="Arial" style:font-family-complex="Arial" fo:font-size="12pt"/>
    </style:style>
    <style:style style:family="text" style:name="T1813">
      <style:text-properties fo:color="#1f1f1f" fo:font-family="Arial" style:font-family-asian="Arial" style:font-family-complex="Arial" fo:font-size="12pt"/>
    </style:style>
    <style:style style:parent-style-name="912" style:list-style-name="WWNum64" style:family="paragraph" style:name="P1181">
      <style:paragraph-properties fo:line-height="115%" fo:margin-right="0cm" fo:margin-top="0pt" fo:margin-bottom="0pt" fo:border="none"/>
      <style:text-properties fo:font-family="Arial" style:font-family-asian="Arial" style:font-family-complex="Arial" fo:font-size="12pt"/>
    </style:style>
    <style:style style:family="text" style:name="T1814">
      <style:text-properties fo:color="#1f1f1f" fo:font-family="Arial" style:font-family-asian="Arial" style:font-family-complex="Arial" fo:font-size="12pt"/>
    </style:style>
    <style:style style:parent-style-name="912" style:list-style-name="WWNum64" style:family="paragraph" style:name="P1182">
      <style:paragraph-properties fo:line-height="115%" fo:margin-right="0cm" fo:margin-top="0pt" fo:margin-bottom="0pt" fo:border="none"/>
      <style:text-properties fo:font-family="Arial" style:font-family-asian="Arial" style:font-family-complex="Arial" fo:font-size="12pt"/>
    </style:style>
    <style:style style:family="text" style:name="T1815">
      <style:text-properties fo:color="#1f1f1f" fo:font-family="Arial" style:font-family-asian="Arial" style:font-family-complex="Arial" fo:font-size="12pt"/>
    </style:style>
    <style:style style:family="paragraph" style:name="P1183">
      <style:paragraph-properties/>
      <style:text-properties/>
    </style:style>
    <style:style style:parent-style-name="851" style:family="paragraph" style:name="P118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816">
      <style:text-properties fo:color="#1f1f1f" fo:font-family="Arial" style:font-family-asian="Arial" style:font-family-complex="Arial" fo:font-size="14pt" fo:font-weight="bold"/>
    </style:style>
    <style:style style:family="paragraph" style:name="P118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17">
      <style:text-properties fo:color="#1f1f1f" fo:font-family="Arial" style:font-family-asian="Arial" style:font-family-complex="Arial" fo:font-size="12pt"/>
    </style:style>
    <style:style style:parent-style-name="852" style:family="paragraph" style:name="P118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18">
      <style:text-properties fo:color="#1f1f1f" fo:font-family="Arial" style:font-family-asian="Arial" style:font-family-complex="Arial" fo:font-size="12pt" fo:font-weight="bold"/>
    </style:style>
    <style:style style:family="paragraph" style:name="P118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19">
      <style:text-properties fo:color="#1f1f1f" fo:font-family="Arial" style:font-family-asian="Arial" style:font-family-complex="Arial" fo:font-size="12pt"/>
    </style:style>
    <style:style style:family="text" style:name="T1820">
      <style:text-properties fo:color="#1f1f1f" fo:font-family="Arial" style:font-family-asian="Arial" style:font-family-complex="Arial" fo:font-size="12pt"/>
    </style:style>
    <style:style style:parent-style-name="852" style:family="paragraph" style:name="P118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21">
      <style:text-properties fo:color="#1f1f1f" fo:font-family="Arial" style:font-family-asian="Arial" style:font-family-complex="Arial" fo:font-size="12pt" fo:font-weight="bold"/>
    </style:style>
    <style:style style:family="paragraph" style:name="P118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22">
      <style:text-properties fo:color="#1f1f1f" fo:font-family="Arial" style:font-family-asian="Arial" style:font-family-complex="Arial" fo:font-size="12pt"/>
    </style:style>
    <style:style style:parent-style-name="852" style:family="paragraph" style:name="P119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23">
      <style:text-properties fo:color="#1f1f1f" fo:font-family="Arial" style:font-family-asian="Arial" style:font-family-complex="Arial" fo:font-size="12pt" fo:font-weight="bold"/>
    </style:style>
    <style:style style:family="paragraph" style:name="P119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24">
      <style:text-properties fo:color="#1f1f1f" fo:font-family="Arial" style:font-family-asian="Arial" style:font-family-complex="Arial" fo:font-size="12pt"/>
    </style:style>
    <style:style style:parent-style-name="852" style:family="paragraph" style:name="P119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25">
      <style:text-properties fo:color="#1f1f1f" fo:font-family="Arial" style:font-family-asian="Arial" style:font-family-complex="Arial" fo:font-size="12pt" fo:font-weight="bold"/>
    </style:style>
    <style:style style:family="paragraph" style:name="P119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26">
      <style:text-properties fo:color="#1f1f1f" fo:font-family="Arial" style:font-family-asian="Arial" style:font-family-complex="Arial" fo:font-size="12pt"/>
    </style:style>
    <style:style style:parent-style-name="851" style:family="paragraph" style:name="P119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27">
      <style:text-properties fo:color="#1f1f1f" fo:font-family="Arial" style:font-family-asian="Arial" style:font-family-complex="Arial" fo:font-size="14pt" fo:font-weight="bold"/>
    </style:style>
    <style:style style:parent-style-name="912" style:list-style-name="WWNum65" style:family="paragraph" style:name="P1195">
      <style:paragraph-properties fo:line-height="115%" fo:margin-right="0cm" fo:margin-top="0pt" fo:margin-bottom="0pt" fo:border="none"/>
      <style:text-properties fo:font-family="Arial" style:font-family-asian="Arial" style:font-family-complex="Arial" fo:font-size="12pt"/>
    </style:style>
    <style:style style:family="text" style:name="T1828">
      <style:text-properties fo:color="#1f1f1f" fo:font-family="Arial" style:font-family-asian="Arial" style:font-family-complex="Arial" fo:font-size="12pt"/>
    </style:style>
    <style:style style:parent-style-name="912" style:list-style-name="WWNum65" style:family="paragraph" style:name="P1196">
      <style:paragraph-properties fo:line-height="115%" fo:margin-right="0cm" fo:margin-top="0pt" fo:margin-bottom="0pt" fo:border="none"/>
      <style:text-properties fo:font-family="Arial" style:font-family-asian="Arial" style:font-family-complex="Arial" fo:font-size="12pt"/>
    </style:style>
    <style:style style:family="text" style:name="T1829">
      <style:text-properties fo:color="#1f1f1f" fo:font-family="Arial" style:font-family-asian="Arial" style:font-family-complex="Arial" fo:font-size="12pt"/>
    </style:style>
    <style:style style:parent-style-name="912" style:list-style-name="WWNum65" style:family="paragraph" style:name="P1197">
      <style:paragraph-properties fo:line-height="115%" fo:margin-right="0cm" fo:margin-top="0pt" fo:margin-bottom="0pt" fo:border="none"/>
      <style:text-properties fo:font-family="Arial" style:font-family-asian="Arial" style:font-family-complex="Arial" fo:font-size="12pt"/>
    </style:style>
    <style:style style:family="text" style:name="T1830">
      <style:text-properties fo:color="#1f1f1f" fo:font-family="Arial" style:font-family-asian="Arial" style:font-family-complex="Arial" fo:font-size="12pt"/>
    </style:style>
    <style:style style:parent-style-name="912" style:list-style-name="WWNum65" style:family="paragraph" style:name="P1198">
      <style:paragraph-properties fo:line-height="115%" fo:margin-right="0cm" fo:margin-top="0pt" fo:margin-bottom="0pt" fo:border="none"/>
      <style:text-properties fo:font-family="Arial" style:font-family-asian="Arial" style:font-family-complex="Arial" fo:font-size="12pt"/>
    </style:style>
    <style:style style:family="text" style:name="T1831">
      <style:text-properties fo:color="#1f1f1f" fo:font-family="Arial" style:font-family-asian="Arial" style:font-family-complex="Arial" fo:font-size="12pt"/>
    </style:style>
    <style:style style:family="paragraph" style:name="P1199">
      <style:paragraph-properties/>
      <style:text-properties/>
    </style:style>
    <style:style style:family="paragraph" style:name="P1200">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832">
      <style:text-properties fo:color="#1f1f1f" fo:font-family="Arial" style:font-family-asian="Arial" style:font-family-complex="Arial" fo:font-size="12pt"/>
    </style:style>
    <style:style style:parent-style-name="851" style:family="paragraph" style:name="P120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33">
      <style:text-properties fo:color="#1f1f1f" fo:font-family="Arial" style:font-family-asian="Arial" style:font-family-complex="Arial" fo:font-size="14pt" fo:font-weight="bold"/>
    </style:style>
    <style:style style:family="paragraph" style:name="P120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34">
      <style:text-properties fo:color="#1f1f1f" fo:font-family="Arial" style:font-family-asian="Arial" style:font-family-complex="Arial" fo:font-size="12pt"/>
    </style:style>
    <style:style style:parent-style-name="852" style:family="paragraph" style:name="P120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35">
      <style:text-properties fo:color="#1f1f1f" fo:font-family="Arial" style:font-family-asian="Arial" style:font-family-complex="Arial" fo:font-size="12pt" fo:font-weight="bold"/>
    </style:style>
    <style:style style:family="paragraph" style:name="P120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36">
      <style:text-properties fo:color="#1f1f1f" fo:font-family="Arial" style:font-family-asian="Arial" style:font-family-complex="Arial" fo:font-size="12pt"/>
    </style:style>
    <style:style style:parent-style-name="852" style:family="paragraph" style:name="P120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37">
      <style:text-properties fo:color="#1f1f1f" fo:font-family="Arial" style:font-family-asian="Arial" style:font-family-complex="Arial" fo:font-size="12pt" fo:font-weight="bold"/>
    </style:style>
    <style:style style:family="paragraph" style:name="P120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38">
      <style:text-properties fo:color="#1f1f1f" fo:font-family="Arial" style:font-family-asian="Arial" style:font-family-complex="Arial" fo:font-size="12pt"/>
    </style:style>
    <style:style style:parent-style-name="852" style:family="paragraph" style:name="P120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39">
      <style:text-properties fo:color="#1f1f1f" fo:font-family="Arial" style:font-family-asian="Arial" style:font-family-complex="Arial" fo:font-size="12pt" fo:font-weight="bold"/>
    </style:style>
    <style:style style:family="paragraph" style:name="P120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40">
      <style:text-properties fo:color="#1f1f1f" fo:font-family="Arial" style:font-family-asian="Arial" style:font-family-complex="Arial" fo:font-size="12pt"/>
    </style:style>
    <style:style style:parent-style-name="852" style:family="paragraph" style:name="P120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41">
      <style:text-properties fo:color="#1f1f1f" fo:font-family="Arial" style:font-family-asian="Arial" style:font-family-complex="Arial" fo:font-size="12pt" fo:font-weight="bold"/>
    </style:style>
    <style:style style:family="paragraph" style:name="P121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42">
      <style:text-properties fo:color="#1f1f1f" fo:font-family="Arial" style:font-family-asian="Arial" style:font-family-complex="Arial" fo:font-size="12pt"/>
    </style:style>
    <style:style style:parent-style-name="851" style:family="paragraph" style:name="P121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43">
      <style:text-properties fo:color="#1f1f1f" fo:font-family="Arial" style:font-family-asian="Arial" style:font-family-complex="Arial" fo:font-size="14pt" fo:font-weight="bold"/>
    </style:style>
    <style:style style:parent-style-name="912" style:list-style-name="WWNum66" style:family="paragraph" style:name="P1212">
      <style:paragraph-properties fo:line-height="115%" fo:margin-right="0cm" fo:margin-top="0pt" fo:margin-bottom="0pt" fo:border="none"/>
      <style:text-properties fo:font-family="Arial" style:font-family-asian="Arial" style:font-family-complex="Arial" fo:font-size="12pt"/>
    </style:style>
    <style:style style:family="text" style:name="T1844">
      <style:text-properties fo:color="#1f1f1f" fo:font-family="Arial" style:font-family-asian="Arial" style:font-family-complex="Arial" fo:font-size="12pt"/>
    </style:style>
    <style:style style:parent-style-name="912" style:list-style-name="WWNum66" style:family="paragraph" style:name="P1213">
      <style:paragraph-properties fo:line-height="115%" fo:margin-right="0cm" fo:margin-top="0pt" fo:margin-bottom="0pt" fo:border="none"/>
      <style:text-properties fo:font-family="Arial" style:font-family-asian="Arial" style:font-family-complex="Arial" fo:font-size="12pt"/>
    </style:style>
    <style:style style:family="text" style:name="T1845">
      <style:text-properties fo:color="#1f1f1f" fo:font-family="Arial" style:font-family-asian="Arial" style:font-family-complex="Arial" fo:font-size="12pt"/>
    </style:style>
    <style:style style:parent-style-name="912" style:list-style-name="WWNum66" style:family="paragraph" style:name="P1214">
      <style:paragraph-properties fo:line-height="115%" fo:margin-right="0cm" fo:margin-top="0pt" fo:margin-bottom="0pt" fo:border="none"/>
      <style:text-properties fo:font-family="Arial" style:font-family-asian="Arial" style:font-family-complex="Arial" fo:font-size="12pt"/>
    </style:style>
    <style:style style:family="text" style:name="T1846">
      <style:text-properties fo:color="#1f1f1f" fo:font-family="Arial" style:font-family-asian="Arial" style:font-family-complex="Arial" fo:font-size="12pt"/>
    </style:style>
    <style:style style:parent-style-name="912" style:list-style-name="WWNum66" style:family="paragraph" style:name="P1215">
      <style:paragraph-properties fo:line-height="115%" fo:margin-right="0cm" fo:margin-top="0pt" fo:margin-bottom="0pt" fo:border="none"/>
      <style:text-properties fo:font-family="Arial" style:font-family-asian="Arial" style:font-family-complex="Arial" fo:font-size="12pt"/>
    </style:style>
    <style:style style:family="text" style:name="T1847">
      <style:text-properties fo:color="#1f1f1f" fo:font-family="Arial" style:font-family-asian="Arial" style:font-family-complex="Arial" fo:font-size="12pt"/>
    </style:style>
    <style:style style:family="paragraph" style:name="P1216">
      <style:paragraph-properties/>
      <style:text-properties/>
    </style:style>
    <style:style style:family="paragraph" style:name="P121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848">
      <style:text-properties fo:color="#1f1f1f" fo:font-family="Arial" style:font-family-asian="Arial" style:font-family-complex="Arial" fo:font-size="12pt"/>
    </style:style>
    <style:style style:parent-style-name="851" style:family="paragraph" style:name="P121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49">
      <style:text-properties fo:color="#1f1f1f" fo:font-family="Arial" style:font-family-asian="Arial" style:font-family-complex="Arial" fo:font-size="14pt" fo:font-weight="bold"/>
    </style:style>
    <style:style style:family="paragraph" style:name="P12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50">
      <style:text-properties fo:color="#1f1f1f" fo:font-family="Arial" style:font-family-asian="Arial" style:font-family-complex="Arial" fo:font-size="12pt"/>
    </style:style>
    <style:style style:family="paragraph" style:name="P122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51">
      <style:text-properties fo:color="#1f1f1f" fo:font-family="Arial" style:font-family-asian="Arial" style:font-family-complex="Arial" fo:font-size="12pt"/>
    </style:style>
    <style:style style:family="paragraph" style:name="P12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52">
      <style:text-properties fo:color="#1f1f1f" fo:font-family="Arial" style:font-family-asian="Arial" style:font-family-complex="Arial" fo:font-size="12pt"/>
    </style:style>
    <style:style style:family="paragraph" style:name="P122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53">
      <style:text-properties fo:color="#1f1f1f" fo:font-family="Arial" style:font-family-asian="Arial" style:font-family-complex="Arial" fo:font-size="12pt"/>
    </style:style>
    <style:style style:family="text" style:name="T1854">
      <style:text-properties fo:color="#1f1f1f" fo:font-family="Arial" style:font-family-asian="Arial" style:font-family-complex="Arial" fo:font-size="12pt"/>
    </style:style>
    <style:style style:family="paragraph" style:name="P122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55">
      <style:text-properties fo:color="#1f1f1f" fo:font-family="Arial" style:font-family-asian="Arial" style:font-family-complex="Arial" fo:font-size="12pt"/>
    </style:style>
    <style:style style:family="text" style:name="T1856">
      <style:text-properties fo:color="#1f1f1f" fo:font-family="Arial" style:font-family-asian="Arial" style:font-family-complex="Arial" fo:font-size="12pt"/>
    </style:style>
    <style:style style:parent-style-name="851" style:family="paragraph" style:name="P122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57">
      <style:text-properties fo:color="#1f1f1f" fo:font-family="Arial" style:font-family-asian="Arial" style:font-family-complex="Arial" fo:font-size="14pt" fo:font-weight="bold"/>
    </style:style>
    <style:style style:parent-style-name="912" style:list-style-name="WWNum67" style:family="paragraph" style:name="P1225">
      <style:paragraph-properties fo:line-height="115%" fo:margin-right="0cm" fo:margin-top="0pt" fo:margin-bottom="0pt" fo:border="none"/>
      <style:text-properties fo:font-family="Arial" style:font-family-asian="Arial" style:font-family-complex="Arial" fo:font-size="12pt"/>
    </style:style>
    <style:style style:family="text" style:name="T1858">
      <style:text-properties fo:color="#1f1f1f" fo:font-family="Arial" style:font-family-asian="Arial" style:font-family-complex="Arial" fo:font-size="12pt"/>
    </style:style>
    <style:style style:parent-style-name="912" style:list-style-name="WWNum67" style:family="paragraph" style:name="P1226">
      <style:paragraph-properties fo:line-height="115%" fo:margin-right="0cm" fo:margin-top="0pt" fo:margin-bottom="0pt" fo:border="none"/>
      <style:text-properties fo:font-family="Arial" style:font-family-asian="Arial" style:font-family-complex="Arial" fo:font-size="12pt"/>
    </style:style>
    <style:style style:family="text" style:name="T1859">
      <style:text-properties fo:color="#1f1f1f" fo:font-family="Arial" style:font-family-asian="Arial" style:font-family-complex="Arial" fo:font-size="12pt"/>
    </style:style>
    <style:style style:parent-style-name="912" style:list-style-name="WWNum67" style:family="paragraph" style:name="P1227">
      <style:paragraph-properties fo:line-height="115%" fo:margin-right="0cm" fo:margin-top="0pt" fo:margin-bottom="0pt" fo:border="none"/>
      <style:text-properties fo:font-family="Arial" style:font-family-asian="Arial" style:font-family-complex="Arial" fo:font-size="12pt"/>
    </style:style>
    <style:style style:family="text" style:name="T1860">
      <style:text-properties fo:color="#1f1f1f" fo:font-family="Arial" style:font-family-asian="Arial" style:font-family-complex="Arial" fo:font-size="12pt"/>
    </style:style>
    <style:style style:parent-style-name="912" style:list-style-name="WWNum67" style:family="paragraph" style:name="P1228">
      <style:paragraph-properties fo:line-height="115%" fo:margin-right="0cm" fo:margin-top="0pt" fo:margin-bottom="0pt" fo:border="none"/>
      <style:text-properties fo:font-family="Arial" style:font-family-asian="Arial" style:font-family-complex="Arial" fo:font-size="12pt"/>
    </style:style>
    <style:style style:family="text" style:name="T1861">
      <style:text-properties fo:color="#1f1f1f" fo:font-family="Arial" style:font-family-asian="Arial" style:font-family-complex="Arial" fo:font-size="12pt"/>
    </style:style>
    <style:style style:family="paragraph" style:name="P1229">
      <style:paragraph-properties/>
      <style:text-properties/>
    </style:style>
    <style:style style:family="paragraph" style:name="P1230">
      <style:paragraph-properties fo:break-before="page"/>
      <style:text-properties/>
    </style:style>
    <style:style style:parent-style-name="851" style:family="paragraph" style:name="P123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862">
      <style:text-properties fo:color="#1f1f1f" fo:font-family="Arial" style:font-family-asian="Arial" style:font-family-complex="Arial" fo:font-size="14pt" fo:font-weight="bold"/>
    </style:style>
    <style:style style:family="paragraph" style:name="P123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63">
      <style:text-properties fo:color="#1f1f1f" fo:font-family="Arial" style:font-family-asian="Arial" style:font-family-complex="Arial" fo:font-size="12pt"/>
    </style:style>
    <style:style style:parent-style-name="852" style:family="paragraph" style:name="P123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64">
      <style:text-properties fo:color="#1f1f1f" fo:font-family="Arial" style:font-family-asian="Arial" style:font-family-complex="Arial" fo:font-size="12pt" fo:font-weight="bold"/>
    </style:style>
    <style:style style:family="paragraph" style:name="P123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65">
      <style:text-properties fo:color="#1f1f1f" fo:font-family="Arial" style:font-family-asian="Arial" style:font-family-complex="Arial" fo:font-size="12pt"/>
    </style:style>
    <style:style style:family="text" style:name="T1866">
      <style:text-properties fo:color="#1f1f1f" fo:font-family="Arial" style:font-family-asian="Arial" style:font-family-complex="Arial" fo:font-size="12pt"/>
    </style:style>
    <style:style style:parent-style-name="852" style:family="paragraph" style:name="P123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67">
      <style:text-properties fo:color="#1f1f1f" fo:font-family="Arial" style:font-family-asian="Arial" style:font-family-complex="Arial" fo:font-size="12pt" fo:font-weight="bold"/>
    </style:style>
    <style:style style:family="paragraph" style:name="P12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68">
      <style:text-properties fo:color="#1f1f1f" fo:font-family="Arial" style:font-family-asian="Arial" style:font-family-complex="Arial" fo:font-size="12pt"/>
    </style:style>
    <style:style style:parent-style-name="852" style:family="paragraph" style:name="P123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69">
      <style:text-properties fo:color="#1f1f1f" fo:font-family="Arial" style:font-family-asian="Arial" style:font-family-complex="Arial" fo:font-size="12pt" fo:font-weight="bold"/>
    </style:style>
    <style:style style:family="paragraph" style:name="P123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70">
      <style:text-properties fo:color="#1f1f1f" fo:font-family="Arial" style:font-family-asian="Arial" style:font-family-complex="Arial" fo:font-size="12pt"/>
    </style:style>
    <style:style style:family="text" style:name="T1871">
      <style:text-properties fo:color="#1f1f1f" fo:font-family="Arial" style:font-family-asian="Arial" style:font-family-complex="Arial" fo:font-size="12pt"/>
    </style:style>
    <style:style style:parent-style-name="852" style:family="paragraph" style:name="P12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72">
      <style:text-properties fo:color="#1f1f1f" fo:font-family="Arial" style:font-family-asian="Arial" style:font-family-complex="Arial" fo:font-size="12pt" fo:font-weight="bold"/>
    </style:style>
    <style:style style:family="paragraph" style:name="P12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73">
      <style:text-properties fo:color="#1f1f1f" fo:font-family="Arial" style:font-family-asian="Arial" style:font-family-complex="Arial" fo:font-size="12pt"/>
    </style:style>
    <style:style style:family="text" style:name="T1874">
      <style:text-properties fo:color="#1f1f1f" fo:font-family="Arial" style:font-family-asian="Arial" style:font-family-complex="Arial" fo:font-size="12pt"/>
    </style:style>
    <style:style style:parent-style-name="851" style:family="paragraph" style:name="P12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75">
      <style:text-properties fo:color="#1f1f1f" fo:font-family="Arial" style:font-family-asian="Arial" style:font-family-complex="Arial" fo:font-size="14pt" fo:font-weight="bold"/>
    </style:style>
    <style:style style:parent-style-name="912" style:list-style-name="WWNum68" style:family="paragraph" style:name="P1242">
      <style:paragraph-properties fo:line-height="115%" fo:margin-right="0cm" fo:margin-top="0pt" fo:margin-bottom="0pt" fo:border="none"/>
      <style:text-properties fo:font-family="Arial" style:font-family-asian="Arial" style:font-family-complex="Arial" fo:font-size="12pt"/>
    </style:style>
    <style:style style:family="text" style:name="T1876">
      <style:text-properties fo:color="#1f1f1f" fo:font-family="Arial" style:font-family-asian="Arial" style:font-family-complex="Arial" fo:font-size="12pt"/>
    </style:style>
    <style:style style:parent-style-name="912" style:list-style-name="WWNum68" style:family="paragraph" style:name="P1243">
      <style:paragraph-properties fo:line-height="115%" fo:margin-right="0cm" fo:margin-top="0pt" fo:margin-bottom="0pt" fo:border="none"/>
      <style:text-properties fo:font-family="Arial" style:font-family-asian="Arial" style:font-family-complex="Arial" fo:font-size="12pt"/>
    </style:style>
    <style:style style:family="text" style:name="T1877">
      <style:text-properties fo:color="#1f1f1f" fo:font-family="Arial" style:font-family-asian="Arial" style:font-family-complex="Arial" fo:font-size="12pt"/>
    </style:style>
    <style:style style:parent-style-name="912" style:list-style-name="WWNum68" style:family="paragraph" style:name="P1244">
      <style:paragraph-properties fo:line-height="115%" fo:margin-right="0cm" fo:margin-top="0pt" fo:margin-bottom="0pt" fo:border="none"/>
      <style:text-properties fo:font-family="Arial" style:font-family-asian="Arial" style:font-family-complex="Arial" fo:font-size="12pt"/>
    </style:style>
    <style:style style:family="text" style:name="T1878">
      <style:text-properties fo:color="#1f1f1f" fo:font-family="Arial" style:font-family-asian="Arial" style:font-family-complex="Arial" fo:font-size="12pt"/>
    </style:style>
    <style:style style:parent-style-name="912" style:list-style-name="WWNum68" style:family="paragraph" style:name="P1245">
      <style:paragraph-properties fo:line-height="115%" fo:margin-right="0cm" fo:margin-top="0pt" fo:margin-bottom="0pt" fo:border="none"/>
      <style:text-properties fo:font-family="Arial" style:font-family-asian="Arial" style:font-family-complex="Arial" fo:font-size="12pt"/>
    </style:style>
    <style:style style:family="text" style:name="T1879">
      <style:text-properties fo:color="#1f1f1f" fo:font-family="Arial" style:font-family-asian="Arial" style:font-family-complex="Arial" fo:font-size="12pt"/>
    </style:style>
    <style:style style:family="paragraph" style:name="P1246">
      <style:paragraph-properties/>
      <style:text-properties/>
    </style:style>
    <style:style style:parent-style-name="851" style:family="paragraph" style:name="P124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880">
      <style:text-properties fo:color="#1f1f1f" fo:font-family="Arial" style:font-family-asian="Arial" style:font-family-complex="Arial" fo:font-size="14pt" fo:font-weight="bold"/>
    </style:style>
    <style:style style:family="paragraph" style:name="P124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1">
      <style:text-properties fo:color="#1f1f1f" fo:font-family="Arial" style:font-family-asian="Arial" style:font-family-complex="Arial" fo:font-size="12pt"/>
    </style:style>
    <style:style style:parent-style-name="852" style:family="paragraph" style:name="P124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2">
      <style:text-properties fo:color="#1f1f1f" fo:font-family="Arial" style:font-family-asian="Arial" style:font-family-complex="Arial" fo:font-size="12pt" fo:font-weight="bold"/>
    </style:style>
    <style:style style:family="paragraph" style:name="P125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3">
      <style:text-properties fo:color="#1f1f1f" fo:font-family="Arial" style:font-family-asian="Arial" style:font-family-complex="Arial" fo:font-size="12pt"/>
    </style:style>
    <style:style style:parent-style-name="852" style:family="paragraph" style:name="P125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4">
      <style:text-properties fo:color="#1f1f1f" fo:font-family="Arial" style:font-family-asian="Arial" style:font-family-complex="Arial" fo:font-size="12pt" fo:font-weight="bold"/>
    </style:style>
    <style:style style:family="paragraph" style:name="P125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5">
      <style:text-properties fo:color="#1f1f1f" fo:font-family="Arial" style:font-family-asian="Arial" style:font-family-complex="Arial" fo:font-size="12pt"/>
    </style:style>
    <style:style style:parent-style-name="852" style:family="paragraph" style:name="P125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6">
      <style:text-properties fo:color="#1f1f1f" fo:font-family="Arial" style:font-family-asian="Arial" style:font-family-complex="Arial" fo:font-size="12pt" fo:font-weight="bold"/>
    </style:style>
    <style:style style:family="paragraph" style:name="P125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7">
      <style:text-properties fo:color="#1f1f1f" fo:font-family="Arial" style:font-family-asian="Arial" style:font-family-complex="Arial" fo:font-size="12pt"/>
    </style:style>
    <style:style style:parent-style-name="852" style:family="paragraph" style:name="P125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8">
      <style:text-properties fo:color="#1f1f1f" fo:font-family="Arial" style:font-family-asian="Arial" style:font-family-complex="Arial" fo:font-size="12pt" fo:font-weight="bold"/>
    </style:style>
    <style:style style:family="paragraph" style:name="P125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9">
      <style:text-properties fo:color="#1f1f1f" fo:font-family="Arial" style:font-family-asian="Arial" style:font-family-complex="Arial" fo:font-size="12pt"/>
    </style:style>
    <style:style style:family="text" style:name="T1890">
      <style:text-properties fo:color="#1f1f1f" fo:font-family="Arial" style:font-family-asian="Arial" style:font-family-complex="Arial" fo:font-size="12pt"/>
    </style:style>
    <style:style style:parent-style-name="851" style:family="paragraph" style:name="P125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91">
      <style:text-properties fo:color="#1f1f1f" fo:font-family="Arial" style:font-family-asian="Arial" style:font-family-complex="Arial" fo:font-size="14pt" fo:font-weight="bold"/>
    </style:style>
    <style:style style:parent-style-name="912" style:list-style-name="WWNum69" style:family="paragraph" style:name="P1258">
      <style:paragraph-properties fo:line-height="115%" fo:margin-right="0cm" fo:margin-top="0pt" fo:margin-bottom="0pt" fo:border="none"/>
      <style:text-properties fo:font-family="Arial" style:font-family-asian="Arial" style:font-family-complex="Arial" fo:font-size="12pt"/>
    </style:style>
    <style:style style:family="text" style:name="T1892">
      <style:text-properties fo:color="#1f1f1f" fo:font-family="Arial" style:font-family-asian="Arial" style:font-family-complex="Arial" fo:font-size="12pt"/>
    </style:style>
    <style:style style:parent-style-name="912" style:list-style-name="WWNum69" style:family="paragraph" style:name="P1259">
      <style:paragraph-properties fo:line-height="115%" fo:margin-right="0cm" fo:margin-top="0pt" fo:margin-bottom="0pt" fo:border="none"/>
      <style:text-properties fo:font-family="Arial" style:font-family-asian="Arial" style:font-family-complex="Arial" fo:font-size="12pt"/>
    </style:style>
    <style:style style:family="text" style:name="T1893">
      <style:text-properties fo:color="#1f1f1f" fo:font-family="Arial" style:font-family-asian="Arial" style:font-family-complex="Arial" fo:font-size="12pt"/>
    </style:style>
    <style:style style:parent-style-name="912" style:list-style-name="WWNum69" style:family="paragraph" style:name="P1260">
      <style:paragraph-properties fo:line-height="115%" fo:margin-right="0cm" fo:margin-top="0pt" fo:margin-bottom="0pt" fo:border="none"/>
      <style:text-properties fo:font-family="Arial" style:font-family-asian="Arial" style:font-family-complex="Arial" fo:font-size="12pt"/>
    </style:style>
    <style:style style:family="text" style:name="T1894">
      <style:text-properties fo:color="#1f1f1f" fo:font-family="Arial" style:font-family-asian="Arial" style:font-family-complex="Arial" fo:font-size="12pt"/>
    </style:style>
    <style:style style:parent-style-name="912" style:list-style-name="WWNum69" style:family="paragraph" style:name="P1261">
      <style:paragraph-properties fo:line-height="115%" fo:margin-right="0cm" fo:margin-top="0pt" fo:margin-bottom="0pt" fo:border="none"/>
      <style:text-properties fo:font-family="Arial" style:font-family-asian="Arial" style:font-family-complex="Arial" fo:font-size="12pt"/>
    </style:style>
    <style:style style:family="text" style:name="T1895">
      <style:text-properties fo:color="#1f1f1f" fo:font-family="Arial" style:font-family-asian="Arial" style:font-family-complex="Arial" fo:font-size="12pt"/>
    </style:style>
    <style:style style:family="paragraph" style:name="P1262">
      <style:paragraph-properties/>
      <style:text-properties/>
    </style:style>
    <style:style style:family="paragraph" style:name="P1263">
      <style:paragraph-properties fo:break-before="page"/>
      <style:text-properties/>
    </style:style>
    <style:style style:family="text" style:name="T1896">
      <style:text-properties/>
    </style:style>
    <style:style style:family="text" style:name="T1897">
      <style:text-properties/>
    </style:style>
    <style:style style:family="text" style:name="T1898">
      <style:text-properties/>
    </style:style>
    <style:style style:family="paragraph" style:name="P126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99">
      <style:text-properties fo:color="#1f1f1f" fo:font-family="Arial" style:font-family-asian="Arial" style:font-family-complex="Arial" fo:font-size="12pt"/>
    </style:style>
    <style:style style:parent-style-name="851" style:family="paragraph" style:name="P126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900">
      <style:text-properties fo:color="#1f1f1f" fo:font-family="Arial" style:font-family-asian="Arial" style:font-family-complex="Arial" fo:font-size="14pt" fo:font-weight="bold"/>
    </style:style>
    <style:style style:family="paragraph" style:name="P126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01">
      <style:text-properties fo:color="#1f1f1f" fo:font-family="Arial" style:font-family-asian="Arial" style:font-family-complex="Arial" fo:font-size="12pt"/>
    </style:style>
    <style:style style:parent-style-name="852" style:family="paragraph" style:name="P126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02">
      <style:text-properties fo:color="#1f1f1f" fo:font-family="Arial" style:font-family-asian="Arial" style:font-family-complex="Arial" fo:font-size="12pt" fo:font-weight="bold"/>
    </style:style>
    <style:style style:family="paragraph" style:name="P126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03">
      <style:text-properties fo:color="#1f1f1f" fo:font-family="Arial" style:font-family-asian="Arial" style:font-family-complex="Arial" fo:font-size="12pt"/>
    </style:style>
    <style:style style:parent-style-name="852" style:family="paragraph" style:name="P126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04">
      <style:text-properties fo:color="#1f1f1f" fo:font-family="Arial" style:font-family-asian="Arial" style:font-family-complex="Arial" fo:font-size="12pt" fo:font-weight="bold"/>
    </style:style>
    <style:style style:family="paragraph" style:name="P127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05">
      <style:text-properties fo:color="#1f1f1f" fo:font-family="Arial" style:font-family-asian="Arial" style:font-family-complex="Arial" fo:font-size="12pt"/>
    </style:style>
    <style:style style:family="table" style:name="ta10">
      <style:paragraph-properties fo:line-height="100%" fo:margin-bottom="0pt"/>
      <style:table-properties style:width="8.301cm" fo:margin-left="0cm" table:align="left" style:use-optimal-column-width="true"/>
    </style:style>
    <style:style style:family="table-column" style:name="co27">
      <style:table-column-properties style:column-width="1.427cm" style:use-optimal-column-width="true"/>
    </style:style>
    <style:style style:family="table-column" style:name="co28">
      <style:table-column-properties style:column-width="1.72cm" style:use-optimal-column-width="true"/>
    </style:style>
    <style:style style:family="table-column" style:name="co29">
      <style:table-column-properties style:column-width="5.154cm" style:use-optimal-column-width="true"/>
    </style:style>
    <style:style style:family="table-row" style:name="ro32">
      <style:table-row-properties/>
    </style:style>
    <style:style style:family="table-cell" style:name="ce10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1">
      <style:paragraph-properties style:line-height-at-least="12pt" fo:margin-top="0pt" fo:margin-bottom="0pt"/>
      <style:text-properties/>
    </style:style>
    <style:style style:family="text" style:name="T1906">
      <style:text-properties fo:color="#1f1f1f" fo:font-family="Arial" style:font-family-asian="Arial" style:font-family-complex="Arial" fo:font-size="12pt" fo:font-weight="bold"/>
    </style:style>
    <style:style style:family="table-cell" style:name="ce10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2">
      <style:paragraph-properties style:line-height-at-least="12pt" fo:margin-top="0pt" fo:margin-bottom="0pt"/>
      <style:text-properties/>
    </style:style>
    <style:style style:family="text" style:name="T1907">
      <style:text-properties fo:color="#1f1f1f" fo:font-family="Arial" style:font-family-asian="Arial" style:font-family-complex="Arial" fo:font-size="12pt" fo:font-weight="bold"/>
    </style:style>
    <style:style style:family="table-cell" style:name="ce10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3">
      <style:paragraph-properties style:line-height-at-least="12pt" fo:margin-top="0pt" fo:margin-bottom="0pt"/>
      <style:text-properties/>
    </style:style>
    <style:style style:family="text" style:name="T1908">
      <style:text-properties fo:color="#1f1f1f" fo:font-family="Arial" style:font-family-asian="Arial" style:font-family-complex="Arial" fo:font-size="12pt" fo:font-weight="bold"/>
    </style:style>
    <style:style style:family="table-row" style:name="ro33">
      <style:table-row-properties/>
    </style:style>
    <style:style style:family="table-cell" style:name="ce10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4">
      <style:paragraph-properties style:line-height-at-least="12pt" fo:margin-top="0pt" fo:margin-bottom="0pt"/>
      <style:text-properties/>
    </style:style>
    <style:style style:family="text" style:name="T1909">
      <style:text-properties fo:color="#1f1f1f" fo:font-family="Arial" style:font-family-asian="Arial" style:font-family-complex="Arial" fo:font-size="12pt"/>
    </style:style>
    <style:style style:family="table-cell" style:name="ce10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5">
      <style:paragraph-properties style:line-height-at-least="12pt" fo:margin-top="0pt" fo:margin-bottom="0pt"/>
      <style:text-properties/>
    </style:style>
    <style:style style:family="text" style:name="T1910">
      <style:text-properties fo:color="#1f1f1f" fo:font-family="Arial" style:font-family-asian="Arial" style:font-family-complex="Arial" fo:font-size="12pt"/>
    </style:style>
    <style:style style:family="table-cell" style:name="ce10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6">
      <style:paragraph-properties style:line-height-at-least="12pt" fo:margin-top="0pt" fo:margin-bottom="0pt"/>
      <style:text-properties/>
    </style:style>
    <style:style style:family="text" style:name="T1911">
      <style:text-properties fo:color="#1f1f1f" fo:font-family="Arial" style:font-family-asian="Arial" style:font-family-complex="Arial" fo:font-size="12pt"/>
    </style:style>
    <style:style style:family="table-row" style:name="ro34">
      <style:table-row-properties/>
    </style:style>
    <style:style style:family="table-cell" style:name="ce10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7">
      <style:paragraph-properties style:line-height-at-least="12pt" fo:margin-top="0pt" fo:margin-bottom="0pt"/>
      <style:text-properties/>
    </style:style>
    <style:style style:family="text" style:name="T1912">
      <style:text-properties fo:color="#1f1f1f" fo:font-family="Arial" style:font-family-asian="Arial" style:font-family-complex="Arial" fo:font-size="12pt"/>
    </style:style>
    <style:style style:family="table-cell" style:name="ce10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8">
      <style:paragraph-properties style:line-height-at-least="12pt" fo:margin-top="0pt" fo:margin-bottom="0pt"/>
      <style:text-properties/>
    </style:style>
    <style:style style:family="text" style:name="T1913">
      <style:text-properties fo:color="#1f1f1f" fo:font-family="Arial" style:font-family-asian="Arial" style:font-family-complex="Arial" fo:font-size="12pt"/>
    </style:style>
    <style:style style:family="table-cell" style:name="ce10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279">
      <style:paragraph-properties style:line-height-at-least="12pt" fo:margin-top="0pt" fo:margin-bottom="0pt"/>
      <style:text-properties/>
    </style:style>
    <style:style style:family="text" style:name="T1914">
      <style:text-properties fo:color="#1f1f1f" fo:font-family="Arial" style:font-family-asian="Arial" style:font-family-complex="Arial" fo:font-size="12pt"/>
    </style:style>
    <style:style style:family="paragraph" style:name="P128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15">
      <style:text-properties fo:color="#1f1f1f" fo:font-family="Arial" style:font-family-asian="Arial" style:font-family-complex="Arial" fo:font-size="12pt"/>
    </style:style>
    <style:style style:parent-style-name="852" style:family="paragraph" style:name="P128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16">
      <style:text-properties fo:color="#1f1f1f" fo:font-family="Arial" style:font-family-asian="Arial" style:font-family-complex="Arial" fo:font-size="12pt" fo:font-weight="bold"/>
    </style:style>
    <style:style style:family="paragraph" style:name="P128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17">
      <style:text-properties fo:color="#1f1f1f" fo:font-family="Arial" style:font-family-asian="Arial" style:font-family-complex="Arial" fo:font-size="12pt"/>
    </style:style>
    <style:style style:parent-style-name="912" style:list-style-name="WWNum70" style:family="paragraph" style:name="P1283">
      <style:paragraph-properties fo:line-height="115%" fo:margin-right="0cm" fo:margin-top="0pt" fo:margin-bottom="0pt" fo:border="none"/>
      <style:text-properties fo:font-family="Arial" style:font-family-asian="Arial" style:font-family-complex="Arial" fo:font-size="12pt"/>
    </style:style>
    <style:style style:family="text" style:name="T1918">
      <style:text-properties fo:color="#1f1f1f" fo:font-family="Arial" style:font-family-asian="Arial" style:font-family-complex="Arial" fo:font-size="12pt"/>
    </style:style>
    <style:style style:parent-style-name="912" style:list-style-name="WWNum70" style:family="paragraph" style:name="P1284">
      <style:paragraph-properties fo:line-height="115%" fo:margin-right="0cm" fo:margin-top="0pt" fo:margin-bottom="0pt" fo:border="none"/>
      <style:text-properties fo:font-family="Arial" style:font-family-asian="Arial" style:font-family-complex="Arial" fo:font-size="12pt"/>
    </style:style>
    <style:style style:family="text" style:name="T1919">
      <style:text-properties fo:color="#1f1f1f" fo:font-family="Arial" style:font-family-asian="Arial" style:font-family-complex="Arial" fo:font-size="12pt"/>
    </style:style>
    <style:style style:parent-style-name="912" style:list-style-name="WWNum70" style:family="paragraph" style:name="P1285">
      <style:paragraph-properties fo:line-height="115%" fo:margin-right="0cm" fo:margin-top="0pt" fo:margin-bottom="0pt" fo:border="none"/>
      <style:text-properties fo:font-family="Arial" style:font-family-asian="Arial" style:font-family-complex="Arial" fo:font-size="12pt"/>
    </style:style>
    <style:style style:family="text" style:name="T1920">
      <style:text-properties fo:color="#1f1f1f" fo:font-family="Arial" style:font-family-asian="Arial" style:font-family-complex="Arial" fo:font-size="12pt"/>
    </style:style>
    <style:style style:family="paragraph" style:name="P128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21">
      <style:text-properties fo:color="#1f1f1f" fo:font-family="Arial" style:font-family-asian="Arial" style:font-family-complex="Arial" fo:font-size="12pt"/>
    </style:style>
    <style:style style:parent-style-name="852" style:family="paragraph" style:name="P128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22">
      <style:text-properties fo:color="#1f1f1f" fo:font-family="Arial" style:font-family-asian="Arial" style:font-family-complex="Arial" fo:font-size="12pt" fo:font-weight="bold"/>
    </style:style>
    <style:style style:family="paragraph" style:name="P128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23">
      <style:text-properties fo:color="#1f1f1f" fo:font-family="Arial" style:font-family-asian="Arial" style:font-family-complex="Arial" fo:font-size="12pt"/>
    </style:style>
    <style:style style:parent-style-name="851" style:family="paragraph" style:name="P128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924">
      <style:text-properties fo:color="#1f1f1f" fo:font-family="Arial" style:font-family-asian="Arial" style:font-family-complex="Arial" fo:font-size="14pt" fo:font-weight="bold"/>
    </style:style>
    <style:style style:parent-style-name="912" style:list-style-name="WWNum70" style:family="paragraph" style:name="P1290">
      <style:paragraph-properties fo:line-height="115%" fo:margin-right="0cm" fo:margin-top="0pt" fo:margin-bottom="0pt" fo:border="none"/>
      <style:text-properties fo:font-family="Arial" style:font-family-asian="Arial" style:font-family-complex="Arial" fo:font-size="12pt"/>
    </style:style>
    <style:style style:family="text" style:name="T1925">
      <style:text-properties fo:color="#1f1f1f" fo:font-family="Arial" style:font-family-asian="Arial" style:font-family-complex="Arial" fo:font-size="12pt"/>
    </style:style>
    <style:style style:parent-style-name="912" style:list-style-name="WWNum70" style:family="paragraph" style:name="P1291">
      <style:paragraph-properties fo:line-height="115%" fo:margin-right="0cm" fo:margin-top="0pt" fo:margin-bottom="0pt" fo:border="none"/>
      <style:text-properties fo:font-family="Arial" style:font-family-asian="Arial" style:font-family-complex="Arial" fo:font-size="12pt"/>
    </style:style>
    <style:style style:family="text" style:name="T1926">
      <style:text-properties fo:color="#1f1f1f" fo:font-family="Arial" style:font-family-asian="Arial" style:font-family-complex="Arial" fo:font-size="12pt"/>
    </style:style>
    <style:style style:parent-style-name="912" style:list-style-name="WWNum70" style:family="paragraph" style:name="P1292">
      <style:paragraph-properties fo:line-height="115%" fo:margin-right="0cm" fo:margin-top="0pt" fo:margin-bottom="0pt" fo:border="none"/>
      <style:text-properties fo:font-family="Arial" style:font-family-asian="Arial" style:font-family-complex="Arial" fo:font-size="12pt"/>
    </style:style>
    <style:style style:family="text" style:name="T1927">
      <style:text-properties fo:color="#1f1f1f" fo:font-family="Arial" style:font-family-asian="Arial" style:font-family-complex="Arial" fo:font-size="12pt"/>
    </style:style>
    <style:style style:parent-style-name="912" style:list-style-name="WWNum70" style:family="paragraph" style:name="P1293">
      <style:paragraph-properties fo:line-height="115%" fo:margin-right="0cm" fo:margin-top="0pt" fo:margin-bottom="0pt" fo:border="none"/>
      <style:text-properties fo:font-family="Arial" style:font-family-asian="Arial" style:font-family-complex="Arial" fo:font-size="12pt"/>
    </style:style>
    <style:style style:family="text" style:name="T1928">
      <style:text-properties fo:color="#1f1f1f" fo:font-family="Arial" style:font-family-asian="Arial" style:font-family-complex="Arial" fo:font-size="12pt"/>
    </style:style>
    <style:style style:family="paragraph" style:name="P1294">
      <style:paragraph-properties/>
      <style:text-properties/>
    </style:style>
  </office:automatic-styles>
  <office:body>
    <office:text text:use-soft-page-breaks="true">
      <text:p text:style-name="P33"><text:span text:style-name="T662">[🟢 Online Mode | 26.06.08_12:36:02]</text:span><text:span/></text:p>
      <text:p text:style-name="P34"><text:span text:style-name="T663">귀경게 및 도입부: 지혜의 등불을 켜기 위한 성스러운 인사</text:span><text:span/></text:p>
      <text:p text:style-name="P35"><text:span text:style-name="T664">🔑 핵심 키워드: 귀경게, 문수사리보살, 보리도등론, 예배</text:span><text:span/></text:p>
      <text:p text:style-name="P36"><text:span text:style-name="T665">🎭 거대한 막을 올리는 무대 전의 첫 인사</text:span><text:span/></text:p>
      <text:p text:style-name="P37"><text:span text:style-name="T666">위대한 가르침의 여정을 시작하기에 앞서 온 마음을 다해 고개를 숙여 경의를 표하는 성스러운 도입부야. 이것은 마치 수천 명의 관객이 모인 거대한 대강당에서 주인공이 무대 중앙으로 걸어 나와 본격적인 연주를 시작하기 직전, 관객과 지휘자를 향해 정중하게 허리를 굽혀 인사하는 엄숙한 순간과 아주 똑같아. 내면의 소란스러운 생각들을 일시에 잠재우고 오직 진리에만 집중하겠다는 깊은 다짐이 담겨 있는 고요한 시작점이지.</text:span><text:span/></text:p>
      <text:p text:style-name="P38"><text:span text:style-name="T667">🗡️ 맑고 날카로운 지혜의 상징인 문수보살</text:span><text:span/></text:p>
      <text:p text:style-name="P39"><text:span text:style-name="T668">수행자가 가장 먼저 예배를 올리는 대상은 지혜를 상징하는 문수사리동자보살님이야. 여기서 동자라는 표현은 때 묻지 않은 어린아이처럼 순수하면서도 번뇌에 물들지 않은 강력한 영적 에너지를 뜻해. 마치 최신형 고성능 컴퓨터에 아무런 악성코드나 쓰레기 파일이 깔리지 않은 청정하고 정밀한 상태와 같지. 우리 마음속에 도사린 어둠과 미혹을 단칼에 잘라버릴 날카로운 지혜의 칼날을 내면에 깨우겠다는 상징적인 선언이기도 해.</text:span><text:span/></text:p>
      <text:p text:style-name="P40"><text:span text:style-name="T669">🕯️ 어두운 밤길을 비추는 지혜의 등불</text:span><text:span/></text:p>
      <text:p text:style-name="P41"><text:span text:style-name="T670">이 논서의 원래 제목인 보리도등론은 깨달음으로 가는 길을 밝히는 등불이라는 뜻을 품고 있어. 사방이 칠흑처럼 어두운 낯선 숲길을 걸어갈 때, 발밑의 돌부리에 걸려 넘어지지 않도록 앞길을 훤히 비추어 주는 강력한 랜턴이나 자동차의 상향등과 같은 존재야. 인생이라는 복잡한 미로 속에서 어디로 가야 할지 몰라 방황하는 중생들에게 가장 안전하고 확실한 영적 지도를 펼쳐 보이겠다는 자비로운 의지가 이 제목 속에 고스란히 담겨 있지.</text:span><text:span/></text:p>
      <text:p text:style-name="P42"><text:span text:style-name="T671">📍 목적지를 입력하고 출발하는 영적 여정</text:span><text:span/></text:p>
      <text:p text:style-name="P43"><text:span text:style-name="T672">결국 이 도입부는 본격적인 수행의 길로 진입하기 전에 내비게이션에 최종 목적지를 정확하게 입력하고 확인하는 작업이야. 엔진을 켜고 기어를 주행 모드로 바꾸기 전, 내가 어디를 향해 가고 있으며 누구의 안내를 받을 것인지 명확히 해두는 첫걸음이지. 스승과 보살의 지혜에 온전히 의지함으로써, 앞으로 펼쳐질 깊고 심오한 깨달음의 여정 동안 단 한 번의 탈선도 없이 안전하게 목적지까지 도달할 수 있는 단단한 기초를 다지는 순간이야.</text:span><text:span/></text:p>
      <text:p text:style-name="P44"><text:span text:style-name="T673">📝 핵심 요약</text:span><text:span/></text:p>
      <text:list text:style-name="WWNum1" text:continue-numbering="true">
        <text:list-item>
          <text:p text:style-name="P45"><text:span text:style-name="T674">위대한 가르침을 시작하기 전 스승과 보살에게 정중하게 경의를 표하는 도입부임.</text:span><text:span/></text:p>
        </text:list-item>
        <text:list-item>
          <text:p text:style-name="P46"><text:span text:style-name="T675">번뇌에 물들지 않은 청정한 지혜를 상징하는 문수사리동자보살에게 예배를 올림.</text:span><text:span/></text:p>
        </text:list-item>
        <text:list-item>
          <text:p text:style-name="P47"><text:span text:style-name="T676">논서의 제목처럼 인생의 어두운 미로를 밝혀줄 지혜의 등불을 켜는 영적 지도 역할을 함.</text:span><text:span/></text:p>
        </text:list-item>
        <text:list-item>
          <text:p text:style-name="P48"><text:span text:style-name="T677">본격적인 수행에 앞서 목적지를 명확히 하고 올바른 방향을 설정하는 첫걸음임.</text:span><text:span/></text:p>
        </text:list-item>
      </text:list>
      <text:p text:style-name="P49"><text:span><text:soft-page-break/></text:span><text:span/></text:p>
      <text:p text:style-name="P50"><text:span text:style-name="T678">1. 삼세의 제불과 보리도의 등불</text:span><text:span/></text:p>
      <text:p text:style-name="P51"><text:span text:style-name="T679">🔑 핵심 키워드: 삼세의 승자, 삼보, 보리광, 보리도의 등불, 예경</text:span><text:span/></text:p>
      <text:p text:style-name="P52"><text:span text:style-name="T680">🙏 삼세의 승자와 삼보를 향한 깊은 예경</text:span><text:span/></text:p>
      <text:p text:style-name="P53"><text:span text:style-name="T681">거대한 미지의 세계로 탐험을 떠나기 전, 그 길을 먼저 완벽하게 주파한 전설적인 탐험가 대장님들에게 정중하게 인사를 건네고 조언을 구하는 것처럼, 이 가르침의 시작은 과거·현재·미래의 모든 부처님과 그분들의 위대한 가르침, 그리고 그 길을 함께 걷는 청정한 동반자들에게 온 마음을 다해 고개 숙여 예배하는 것으로 시작해. 이 예경은 단순한 종교적 형식을 넘어, 내 마음의 주파수를 우주의 가장 순수하고 높은 지혜에 일치시키는 아주 정교한 조율 작업과 같아.</text:span><text:span/></text:p>
      <text:p text:style-name="P54"><text:span text:style-name="T682">✉️ 현량한 제자 보리광의 간청과 아름다운 인연</text:span><text:span/></text:p>
      <text:p text:style-name="P55"><text:span text:style-name="T683">이 위대한 지혜의 불꽃이 세상에 탁 켜지게 된 결정적인 계기는 보리광이라는 아주 훌륭하고 눈 밝은 제자의 간절한 청탁 덕분이었어. 마치 학교 수업 시간에 한 학생이 모두가 마음속으로만 궁금해하던 핵심 질문을 용기 있게 던졌을 때, 감동한 선생님이 기쁜 마음으로 칠판 가득 명강의를 펼쳐주시는 상황과 똑같지. 한 사람의 순수한 구도심이 마중물이 되어, 결국 온 세상 사람들의 타는 목마름을 축여줄 거대한 지혜의 샘물이 세상 밖으로 터져 나오게 된 순간이야.</text:span><text:span/></text:p>
      <text:p text:style-name="P56"><text:span text:style-name="T684">💡 어둠을 걷어내는 보리도의 등불</text:span><text:span/></text:p>
      <text:p text:style-name="P57"><text:span text:style-name="T685">여기서 환하게 밝히고자 하는 보리도의 등불은 우리가 인생이라는 낯설고 험난한 밤길을 걸을 때 발밑을 안전하게 비춰주는 고성능 손전등과 같아. 아무리 앞이 보이지 않는 캄캄한 미로 속에 갇혀 있더라도, 직진성이 강한 불빛 하나만 제대로 확보되면 어디가 위험한 낭떠러지이고 어디가 탄탄한 탄탄대로인지 단박에 분별할 수 있잖아. 이 가르침은 무지와 번뇌라는 짙은 안개에 갇혀 방황하는 영혼들이 한 치의 흔들림도 없이 깨달음의 길을 똑바로 걸어갈 수 있도록 사방을 </text:span><text:span text:style-name="T686">투명하게 밝혀주는 역할을 해.</text:span><text:span/></text:p>
      <text:p text:style-name="P58"><text:span text:style-name="T687">🗺️ 깨달음으로 인도하는 완벽한 영적 내비게이션</text:span><text:span/></text:p>
      <text:p text:style-name="P59"><text:span text:style-name="T688">이 등불은 단순히 어둠을 일시적으로 쫓아내는 것에 그치지 않고, 최종 목적지까지 안전하게 경로를 안내해 주는 완벽한 영적 내비게이션 시스템이 되어줘. 우리가 서 있는 현재 위치의 한계에서부터 시작해 최종 종착지인 보리(깨달음)의 경지에 이르기까지의 전 과정을 아주 체계적이고 명쾌하게 보여주지. 이 확실한 지도를 손에 쥔 수행자는 그 어떤 거친 풍파나 유혹 속에서도 길을 잃지 않고, 앞서가신 성자들이 남긴 평화롭고 당당한 발자국을 그대로 밟아 나갈 수 있는</text:span><text:span text:style-name="T689"> 든든한 나침반을 얻게 된단다.</text:span><text:span/></text:p>
      <text:p text:style-name="P60"><text:span text:style-name="T690">📝 핵심 요약</text:span><text:span/></text:p>
      <text:list text:style-name="WWNum2" text:continue-numbering="true">
        <text:list-item>
          <text:p text:style-name="P61"><text:span text:style-name="T691">과거, 현재, 미래의 모든 부처님과 교법, 승가에 지극한 마음으로 예경을 올리며 시작한다.</text:span><text:span/></text:p>
        </text:list-item>
        <text:list-item>
          <text:p text:style-name="P62"><text:span text:style-name="T692">지혜로운 제자 보리광의 순수한 간청이 계기가 되어 이 위대한 가르침이 세상에 드러났다.</text:span><text:span/></text:p>
        </text:list-item>
        <text:list-item>
          <text:p text:style-name="P63"><text:span text:style-name="T693">보리도의 등불은 무지와 방황의 어둠 속에서 방황하는 유정들의 발밑을 비추는 강력한 빛이다.</text:span><text:span/></text:p>
        </text:list-item>
        <text:list-item>
          <text:p text:style-name="P64"><text:span text:style-name="T694">이 가르침은 초심자부터 최종 깨달음에 이르기까지의 전 과정을 안내하는 명확한 영적 지도다.</text:span><text:span/></text:p>
        </text:list-item>
      </text:list>
      <text:p text:style-name="P65"><text:span><text:soft-page-break/></text:span><text:span/></text:p>
      <text:p text:style-name="P66"><text:span text:style-name="T695">2. 정신적 역량에 따른 세 부류의 인간</text:span><text:span/></text:p>
      <text:p text:style-name="P67"><text:span text:style-name="T696">🔑 핵심 키워드: 하사, 중사, 상사, 근기, 차별성</text:span><text:span/></text:p>
      <text:p text:style-name="P68"><text:span text:style-name="T697">🏃 사람마다 다른 마음의 그릇과 영적 역량</text:span><text:span/></text:p>
      <text:p text:style-name="P69"><text:span text:style-name="T698">우리가 다니는 학교나 직장을 보면 사람마다 가진 재능과 관심사, 그리고 목표의 크기가 전부 다르잖아. 불교에서는 인류가 지닌 정신적인 역량과 마음의 그릇을 근기라고 부르는데, 이 역량의 크기에 따라 사람을 크게 세 가지 부류인 하사, 중사, 상사로 나눈단다. 이는 마치 마라톤을 뛸 때 가볍게 동네 한 바퀴를 돌며 건강을 챙기려는 사람, 아마추어 대회에서 우승을 목표로 달리는 사람, 그리고 세계 신기록을 세워 모두에게 영감을 주려는 국가대표 선수가 있는 것</text:span><text:span text:style-name="T699">과 아주 비슷해. 아티샤 스승님은 이 세 부류의 인간이 가진 고유한 특성과 차이점을 명확하게 밝혀서 우리가 어디로 나아가야 할지 이정표를 세워주려고 하셔.</text:span><text:span/></text:p>
      <text:p text:style-name="P70"><text:span text:style-name="T700">🏕️ 현세와 내세의 안정을 구하는 하사의 마음</text:span><text:span/></text:p>
      <text:p text:style-name="P71"><text:span text:style-name="T701">가장 먼저 하사는 영적인 여정에서 이제 막 걸음마를 떼기 시작한 단계라고 볼 수 있어. 이들의 목표는 거창한 우주의 진리나 완전한 해탈이 아니라, 당장 이번 생과 다음 생에서 고통을 피하고 편안하고 행복한 삶을 누리는 것이란다. 비유하자면 거센 폭풍우가 몰아치는 거대한 산에서 멀리 정상까지 올라갈 엄두는 내지 못하고, 당장 눈앞에 보이는 안전한 첫 번째 베이스캠프에 텐트를 쳐서 오늘 밤을 따뜻하게 보내려는 등산객과 같아. 비록 목표는 소박하지만, 나쁜 행</text:span><text:span text:style-name="T702">동을 멀리하고 선한 업을 쌓아 안전한 행복을 구하려는 소중한 첫걸음이지.</text:span><text:span/></text:p>
      <text:p text:style-name="P72"><text:span text:style-name="T703">🚪 개인의 고통에서 완전히 벗어나려는 중사의 마음</text:span><text:span/></text:p>
      <text:p text:style-name="P73"><text:span text:style-name="T704">그다음 단계인 중사는 단순히 다음 생에 좋은 곳에 태어나는 것만으로는 삶의 근본적인 고통을 완벽하게 해결할 수 없다는 사실을 깊이 깨달은 사람들이야. 이들은 끊임없이 다람쥐 챗바퀴처럼 돌고 도는 윤회의 세계 전체가 결국에는 거대한 감옥과 같다는 것을 알고, 이 감옥 문을 열고 홀로 탈출하여 영원한 평온을 얻고자 해. 이는 마치 사방에서 불길이 치솟는 화재 현장에서 더 이상 임시방편으로 버틸 수 없음을 깨닫고, 오직 자기 자신의 생명을 구하기 위해 필사적으</text:span><text:span text:style-name="T705">로 비상구를 찾아 탈출하려는 영리한 사람과 매우 닮아 있단다. 개인의 완벽한 자유와 해탈을 갈망하는 마음이지.</text:span><text:span/></text:p>
      <text:p text:style-name="P74"><text:span text:style-name="T706">🏔️ 모두를 구하기 위해 정상을 향하는 상사의 마음</text:span><text:span/></text:p>
      <text:p text:style-name="P75"><text:span text:style-name="T707">마지막으로 가장 높은 차원인 상사는 영적인 역량이 최고조에 달한 위대한 영혼들을 뜻해. 이들은 나 혼자 탈출해서 평온해지는 것에 만족하지 않고, 아직도 고통의 감옥과 폭풍우 속에 갇혀서 울부짖는 세상의 모든 생명체를 나와 똑같은 가족으로 바라본단다. 비유하자면 조난 사고가 발생했을 때 자신의 안위는 완전히 뒤로한 채, 매서운 눈보라를 뚫고 산 정상에 올라가 무전기를 설치하고 모든 조난자를 안전하게 구조해 내는 구조대장과 같은 존재야. 모든 생명체를 고통의</text:span><text:span text:style-name="T708"> 바다에서 건져내겠다는 거대한 자비심을 품고, 마침내 완전한 깨달음의 정상을 향해 묵묵히 걸어가는 가장 고귀한 마음의 상태란다.</text:span><text:span/></text:p>
      <text:p text:style-name="P76"><text:span text:style-name="T709">📝 핵심 요약</text:span><text:span/></text:p>
      <text:list text:style-name="WWNum3" text:continue-numbering="true">
        <text:list-item>
          <text:p text:style-name="P77"><text:span text:style-name="T710">인간의 영적 역량인 근기에 따라 하사, 중사, 상사라는 세 가지 사부로 분류함.</text:span><text:span/></text:p>
        </text:list-item>
        <text:list-item>
          <text:p text:style-name="P78"><text:span text:style-name="T711">하사는 당장 내세의 안전과 행복을 목표로 선업을 쌓으려는 소박한 단계임.</text:span><text:span/></text:p>
        </text:list-item>
        <text:list-item>
          <text:p text:style-name="P79"><text:span text:style-name="T712">중사는 윤회의 고통을 깨닫고 개인의 완벽한 해탈과 자유를 구하려는 단계임.</text:span><text:span/></text:p>
        </text:list-item>
        <text:list-item>
          <text:p text:style-name="P80"><text:span text:style-name="T713">상사는 모든 생명체를 구제하겠다는 대자비심으로 완전한 깨달음을 추구함.</text:span><text:span/></text:p>
        </text:list-item>
      </text:list>
      <text:p text:style-name="P81"><text:span><text:soft-page-break/></text:span><text:span/></text:p>
      <text:p text:style-name="P82"><text:span text:style-name="T714">3. 윤회의 안락만을 구하는 하사의 한계</text:span><text:span/></text:p>
      <text:p text:style-name="P83"><text:span text:style-name="T715">🔑 핵심 키워드: 하사(下士), 윤회의 안락, 개인적 목적, 방편의 한계</text:span><text:span/></text:p>
      <text:p text:style-name="P84"><text:span text:style-name="T716">💎 불교의 수행 단계인 람림에서는 인간의 영적 그릇과 지향점을 세 가지 차원으로 나누는데, 그중 가장 초보적인 첫 번째 단계를 바로 하사(下士)라고 불러. 하사는 자신이 처한 거대하고 근원적인 굴레를 보지 못하고, 단지 어떠한 방법을 써서라도 지금 머물고 있는 세상 속에서 소소한 행복과 안락만을 얻으려고 애쓰는 존재를 뜻해. 이건 마치 거대한 감옥에 갇혀 있으면서 탈출할 생각은 전혀 하지 못한 채, 어떻게 하면 조금 더 푹신한 침대와 맛있는 식사를 얻을 </text:span><text:span text:style-name="T717">수 있을까 고민하는 수감자의 모습과 아주 비슷하단다. 궁극적인 자유라는 큰 그림 대신 눈앞의 임시 안락에 만족하는 셈이지.</text:span><text:span/></text:p>
      <text:p text:style-name="P85"><text:span text:style-name="T718">🌊 하사의 가장 큰 특징은 오직 '자기 자신'만의 이익과 안락을 목적으로 삼아 움직인다는 점이야. 이 세상이 끝없이 돌고 도는 고통과 결핍의 바다인 윤회라는 거대한 진실을 꿰뚫어 보지 못하고, 그 안에서 얻는 일시적인 즐거움이 영원할 것이라 믿어 버려. 놀이공원의 화려한 조명이 아무리 멋져도 밤이 되면 결국 문을 닫고 차가운 현실로 돌아와야 하듯, 윤회 안에서의 행복은 결국 바닥이 드러나기 마련인 유한한 신기루일 뿐이야.</text:span><text:span/></text:p>
      <text:p text:style-name="P86"><text:span text:style-name="T719">🛠️ 이들은 세상을 살아가며 나름대로 아주 똑똑하고 다양한 기술이나 세상적인 방편들을 열심히 사용하기도 해. 명성을 얻거나, 물질적인 부를 쌓거나, 혹은 다음 생에 조금 더 좋은 환경에 태어나기 위해 선행을 베푸는 등 부단한 노력을 다하지. 하지만 그 모든 뛰어난 능력과 소중한 도구들을 오직 '윤회 탈출'이 아닌 '윤회 내부의 리모델링'에만 소모하고 있기 때문에 영적인 진화의 한계에 부딪히게 돼. 스마트폰의 엄청난 슈퍼컴퓨터급 성능을 오직 간단한 미니 게</text:span><text:span text:style-name="T720">임을 하는 데만 사용하는 것과 똑같이 안타까운 상황인 거지.</text:span><text:span/></text:p>
      <text:p text:style-name="P87"><text:span text:style-name="T721">🌱 하지만 지금 하사의 단계에 머물러 있는 자신을 발견했다고 해서 실망할 필요는 전혀 없어. 내가 가진 좁은 시야와 한계를 맑은 눈으로 정확하게 인지하는 바로 그 순간이, 내면의 영적 역량이 다음 단계로 크게 도약하는 위대한 출발점이 되기 때문이야. 눈앞의 작은 울타리를 넘어 더 넓은 우주적인 자유를 갈망하기 시작할 때 우리의 의식은 비로소 좁은 틀을 깨고 진정한 성장을 이룰 수 있단다.</text:span><text:span/></text:p>
      <text:p text:style-name="P88"><text:span text:style-name="T722">📝 핵심 요약</text:span><text:span/></text:p>
      <text:list text:style-name="WWNum4" text:continue-numbering="true">
        <text:list-item>
          <text:p text:style-name="P89"><text:span text:style-name="T723">하사는 윤회라는 거대한 굴레 안에서 일시적인 안락과 행복만을 구하는 가장 기초적인 수행 단계를 뜻해.</text:span><text:span/></text:p>
        </text:list-item>
        <text:list-item>
          <text:p text:style-name="P90"><text:span text:style-name="T724">감옥 안에서 더 좋은 침대를 구하듯, 궁극적인 해탈 대신 세상 속의 유한한 즐거움에 안주하는 특징을 가져.</text:span><text:span/></text:p>
        </text:list-item>
        <text:list-item>
          <text:p text:style-name="P91"><text:span text:style-name="T725">다양한 방편과 지혜를 발휘하지만, 그 목적이 오직 자기 자신의 안락과 윤회 내부의 리모델링에만 국한되어 있어 영적 한계가 명확해.</text:span><text:span/></text:p>
        </text:list-item>
        <text:list-item>
          <text:p text:style-name="P92"><text:span text:style-name="T726">이러한 자신의 한계를 명확히 인식하는 것은 실망할 일이 아니며, 더 높은 차원의 영적 성장을 향해 나아가는 소중한 디딤돌이 돼.</text:span><text:span/></text:p>
        </text:list-item>
      </text:list>
      <text:p text:style-name="P93"><text:span><text:soft-page-break/></text:span><text:span/></text:p>
      <text:p text:style-name="P94"><text:span text:style-name="T727">[🟢 Online Mode | 26.06.08_12:37:15]</text:span><text:span/></text:p>
      <text:p text:style-name="P95"><text:span text:style-name="T728">4. 세간의 안락을 넘어 자기 구원을 구하는 중사의 길</text:span><text:span/></text:p>
      <text:p text:style-name="P96"><text:span text:style-name="T729">🔑 핵심 키워드: 세간의 안락, 죄업 탈피, 자기 적멸, 중사의 그릇</text:span><text:span/></text:p>
      <text:p text:style-name="P97"><text:span text:style-name="T730">🎡 달콤한 신기루와의 결별</text:span><text:span/></text:p>
      <text:p text:style-name="P98"><text:span text:style-name="T731">세간의 안락을 등진다는 것은 일시적인 즐거움의 유혹을 알아차리고 그것으로부터 과감히 고개를 돌리는 내면의 결단이야. 비유하자면 끝없이 마셔도 결국 다시 목이 마르는 짠 바닷물을 마시는 일을 멈추고, 진짜 갈증을 해소할 청량한 샘물을 찾아 나서는 지혜로운 선택과 같지. 눈앞의 화려한 불빛에 현혹되지 않고 영원한 가치를 향해 첫발을 내딛는 위대한 시작이야.</text:span><text:span/></text:p>
      <text:p text:style-name="P99"><text:span text:style-name="T732">🛑 어둠의 악순환을 끊는 제동장치</text:span><text:span/></text:p>
      <text:p text:style-name="P100"><text:span text:style-name="T733">죄업에서 돌아선 본성이라는 것은 스스로에게와 타인에게 해를 끼치는 거친 행동의 습관을 완벽하게 제어하는 상태를 말해. 벼랑 끝을 향해 브레이크 없이 질주하던 자동차가 위험을 감지하고 급정거를 하여 안전한 선로로 방향을 트는 유턴 과정과 흡사하다고 볼 수 있지. 더 이상 어두운 카르마의 소용돌이에 휘말리지 않겠다는 강력한 자기 보호이자 영적인 방어벽을 세우는 일이야.</text:span><text:span/></text:p>
      <text:p text:style-name="P101"><text:span text:style-name="T734">🏝️ 홀로 도달하는 평온의 섬</text:span><text:span/></text:p>
      <text:p text:style-name="P102"><text:span text:style-name="T735">세상의 유혹과 죄업을 멀리한 존재가 궁극적으로 도달하고자 하는 목표는 오직 자기 자신만의 완전한 평화와 고요인 적멸이야.</text:span><text:span/></text:p>
      <text:list text:style-name="WWNum5" text:continue-numbering="true">
        <text:list-item>
          <text:p text:style-name="P103"><text:span text:style-name="T736">상태의 본질: 모든 고통과 번뇌의 불길이 완전히 꺼져버린 절대적인 평정 상태</text:span><text:span/></text:p>
        </text:list-item>
        <text:list-item>
          <text:p text:style-name="P104"><text:span text:style-name="T737">직관적 비유: 거센 폭풍우가 몰아치는 바다 한가운데서 홀로 안전하게 떠 있는 고요한 무인도</text:span><text:span/></text:p>
        </text:list-item>
        <text:list-item>
          <text:p text:style-name="P105"><text:span text:style-name="T738">인지의 한계: 자신의 구원에만 집중하느라 주변의 다른 존재들이 겪는 아픔까지는 미처 시선이 닿지 못하는 한계를 지님</text:span><text:span/></text:p>
        </text:list-item>
      </text:list>
      <text:p text:style-name="P106"><text:span text:style-name="T739">⚖️ 중간 지대에 머무는 영혼의 그릇</text:span><text:span/></text:p>
      <text:p text:style-name="P107"><text:span text:style-name="T740">대승의 넓은 안목에서 보면, 이처럼 훌륭한 덕목을 갖추었음에도 오직 스스로의 해탈만을 구하는 존재를 중사라고 정의해.</text:span><text:span/></text:p>
      <table:table table:style-name="ta1">
        <table:table-columns>
          <table:table-column table:style-name="co1"/>
          <table:table-column table:style-name="co2"/>
        </table:table-columns>
        <table:table-row table:style-name="ro1" table:default-cell-style-name="ce1">
          <table:table-cell table:style-name="ce2">
            <text:p text:style-name="P108"><text:span text:style-name="T741">구분</text:span><text:span/></text:p>
          </table:table-cell>
          <table:table-cell table:style-name="ce3">
            <text:p text:style-name="P109"><text:span text:style-name="T742">중사의 영적 위치와 특성 성찰</text:span><text:span/></text:p>
          </table:table-cell>
        </table:table-row>
        <table:table-row table:style-name="ro2" table:default-cell-style-name="ce1">
          <table:table-cell table:style-name="ce4">
            <text:p text:style-name="P110"><text:span text:style-name="T743">성취한 도덕성</text:span><text:span/></text:p>
          </table:table-cell>
          <table:table-cell table:style-name="ce5">
            <text:p text:style-name="P111"><text:span text:style-name="T744">세간의 허망한 쾌락을 멀리하고 악행을 멈추는 청정한 계율을 확립함</text:span><text:span/></text:p>
          </table:table-cell>
        </table:table-row>
        <table:table-row table:style-name="ro3" table:default-cell-style-name="ce1">
          <table:table-cell table:style-name="ce6">
            <text:p text:style-name="P112"><text:span text:style-name="T745">추구하는 목적</text:span><text:span/></text:p>
          </table:table-cell>
          <table:table-cell table:style-name="ce7">
            <text:p text:style-name="P113"><text:span text:style-name="T746">타인의 구제보다 내 영혼의 안녕과 고요를 최우선 과제로 삼음</text:span><text:span/></text:p>
          </table:table-cell>
        </table:table-row>
        <table:table-row table:style-name="ro4" table:default-cell-style-name="ce1">
          <table:table-cell table:style-name="ce8">
            <text:p text:style-name="P114"><text:span text:style-name="T747">성장의 비유</text:span><text:span/></text:p>
          </table:table-cell>
          <table:table-cell table:style-name="ce9">
            <text:p text:style-name="P115"><text:span text:style-name="T748">거친 비바람을 피해 나 혼자 겨우 들어갈 수 있는 작은 우산을 펼쳐 든 모습</text:span><text:span/></text:p>
          </table:table-cell>
        </table:table-row>
      </table:table>
      <text:p text:style-name="P116"><text:span text:style-name="T749">📝 핵심 요약</text:span><text:span/></text:p>
      <text:list text:style-name="WWNum5" text:continue-numbering="true">
        <text:list-item>
          <text:p text:style-name="P117"><text:span text:style-name="T750">세간의 일시적이고 허망한 안락의 유혹으로부터 과감하게 고개를 돌려 결별함.</text:span><text:span/></text:p>
        </text:list-item>
        <text:list-item>
          <text:p text:style-name="P118"><text:span text:style-name="T751">자신과 타인을 해치던 거친 죄업의 고리를 끊고 청정한 본성으로 돌아섬.</text:span><text:span/></text:p>
        </text:list-item>
        <text:list-item>
          <text:p text:style-name="P119"><text:span text:style-name="T752">모든 번뇌의 불길이 소멸한 자기만의 절대적 고요와 적멸의 상태를 추구함.</text:span><text:span/></text:p>
        </text:list-item>
        <text:list-item>
          <text:p text:style-name="P120"><text:span text:style-name="T753">훌륭한 청정함을 갖추었으나 홀로 우산을 쓴 것처럼 개인의 구원에 머무는 중사의 그릇임.</text:span><text:span/></text:p>
        </text:list-item>
      </text:list>
      <text:p text:style-name="P121"><text:span><text:soft-page-break/></text:span><text:span/></text:p>
      <text:p text:style-name="P122"><text:span text:style-name="T754">[🟢 Online Mode | 26.06.08_12:37:26]</text:span><text:span/></text:p>
      <text:p text:style-name="P123"><text:span text:style-name="T755">5. 타인의 고통을 내 것처럼 품는 위대한 상사의 마음</text:span><text:span/></text:p>
      <text:p text:style-name="P124"><text:span text:style-name="T756">🔑 핵심 키워드: 심속, 타인의 고통, 전적 소멸, 상사의 원력, 대승적 자비</text:span><text:span/></text:p>
      <text:p text:style-name="P125"><text:span text:style-name="T757">💔 내가 아파봤기에 열리는 공감의 문</text:span><text:span/></text:p>
      <text:p text:style-name="P126"><text:span text:style-name="T758">이 게송은 인간이 도달할 수 있는 가장 높은 수준의 자비심이 어디서 출발하는지 명확하게 보여주고 있어. 그것은 바로 자기 심속, 즉 내 마음의연속체 안에서 직접 겪은 생생한 고통이야. 내가 지독한 독감에 걸려 쩔쩔매 본 적이 있어야 비로소 골방에서 홀로 앓고 있는 이웃의 신음 소리가 남의 일 같지 않게 들리는 법이잖아. 내 안의 아픔을 단순한 원망으로 끝내는 게 아니라, 타인의 슬픔을 깊이 비추는 맑은 거울로 삼는 놀라운 인식의 전환이지.</text:span><text:span/></text:p>
      <text:p text:style-name="P127"><text:span text:style-name="T759">🌐 보이지 않는 무선 인터넷처럼 연결된 마음</text:span><text:span/></text:p>
      <text:p text:style-name="P128"><text:span text:style-name="T760">두 번째로 주목할 점은 타인의 고통이 결국 내 마음자리와 끈끈하게 연결되어 있다는 감각이야. 그들의 고통이 남의 영역에 있는 게 아니라 나의 정신적 흐름에 귀속되어 있다고 느끼는 상태지. 전 세계의 수많은 컴퓨터가 보이지 않는 무선 인터넷망으로 촘촘하게 연결되어 있어서 한 곳에서 서버 오류가 나면 내 모니터에도 경고창이 뜨는 것과 똑같아. 너와 내가 따로 분리된 남이 아니라, 하나의 거대한 생명망으로 묶여 있음을 온몸으로 직감하는 차원이야.</text:span><text:span/></text:p>
      <text:p text:style-name="P129"><text:span text:style-name="T761">🔥 불씨 하나 남기지 않고 완전히 끄려는 마음</text:span><text:span/></text:p>
      <text:p text:style-name="P130"><text:span text:style-name="T762">상사라고 불리는 위대한 존재들은 타인의 고통을 마주했을 때 적당히 동정하거나 말로만 위로하는 데서 멈추지 않아. 그 아픔을 전적으로, 그리고 완전히 소멸하기를 진심으로 바라지. 이웃집에 난 불을 보고 불쌍하다며 물 한 바가지 대충 붓고 돌아서는 게 아니라, 소방관처럼 직접 뛰어들어 불씨 하나나 연기 한 자락 남지 않도록 완벽하게 진화하려는 결연한 의지와 같아. 고통의 겉모습만 가리는 게 아니라 뿌리 자체를 뽑아버리겠다는 거대한 원력인 셈이야.</text:span><text:span/></text:p>
      <text:p text:style-name="P131"><text:span text:style-name="T763">👑 인류의 가장 고귀한 영웅, 상사의 정의</text:span><text:span/></text:p>
      <text:p text:style-name="P132"><text:span text:style-name="T764">이렇게 내 아픔을 바탕 삼아 온 세상의 모든 고통을 끝내겠다고 당당하게 일어서는 사람을 불교에서는 상사, 즉 가장 뛰어난 존재라고 불러. 내 방 한 칸 깨끗하게 청소하는 것에 만족하는 삶을 넘어, 온 지구의 쓰레기를 내 손으로 다 치우겠다고 무거운 가방을 메고 나서는 영웅과 같지. 자신의 안락을 과감히 내려놓고 타인의 행복을 위해 온 삶을 던질 준비가 된, 인간이 도달할 수 있는 가장 고귀한 정신적 왕관을 쓴 존재란다.</text:span><text:span/></text:p>
      <text:p text:style-name="P133"><text:span text:style-name="T765">📝 핵심 요약</text:span><text:span/></text:p>
      <text:list text:style-name="WWNum6" text:continue-numbering="true">
        <text:list-item>
          <text:p text:style-name="P134"><text:span text:style-name="T766">상사는 자신이 겪은 고통을 바탕으로 타인의 아픔을 깊이 공감하는 존재이다.</text:span><text:span/></text:p>
        </text:list-item>
        <text:list-item>
          <text:p text:style-name="P135"><text:span text:style-name="T767">타인의 고통이 결국 나의 마음자리와 긴밀하게 연결되어 있음을 직감한다.</text:span><text:span/></text:p>
        </text:list-item>
        <text:list-item>
          <text:p text:style-name="P136"><text:span text:style-name="T768">이들은 주변의 아픔을 적당히 돕는 것에 그치지 않고 완전히 소멸하기를 원한다.</text:span><text:span/></text:p>
        </text:list-item>
        <text:list-item>
          <text:p text:style-name="P137"><text:span text:style-name="T769">자신의 안락을 넘어 온 세상의 구제를 서원하는 상사의 마음이야말로 가장 고귀한 정신적 도약이다.</text:span><text:span/></text:p>
        </text:list-item>
      </text:list>
      <text:p text:style-name="P138"><text:span><text:soft-page-break/></text:span><text:span/></text:p>
      <text:p text:style-name="P139"><text:span text:style-name="T770">6. 대보리를 희구하는 뛰어난 이들을 위한 바른 방편</text:span><text:span/></text:p>
      <text:p text:style-name="P140"><text:span text:style-name="T771">🔑 핵심 키워드: 뛰어난 유정, 대보리 희구, 스승의 가르침, 바른 방편</text:span><text:span/></text:p>
      <text:p text:style-name="P141"><text:span text:style-name="T772">💎 원대한 서원을 품은 뛰어난 유정</text:span><text:span/></text:p>
      <text:p text:style-name="P142"><text:span text:style-name="T773">최고의 깨달음을 얻고자 간절히 바라는 서원을 품은 존재들을 밀교에서는 뛰어난 유정이라고 불러. 이건 마치 드넓은 바다를 혼자 건너기 위해 낡고 작은 뗏목을 타는 대신, 수많은 사람을 함께 태우고 안전하게 대양을 가를 수 있는 거대한 함선을 선택하는 선장과 같아. 자신의 개인적인 해탈에만 만족하지 않고, 고통받는 세상의 모든 생명을 짐을 지고 구하겠다는 원대한 목표를 가진 위대한 영혼들을 뜻하는 거지. 이들의 마음은 이미 평범한 차원을 넘어선 보석과도 같아</text:span><text:span text:style-name="T774">.</text:span><text:span/></text:p>
      <text:p text:style-name="P143"><text:span text:style-name="T775">🎯 최고의 깨달음을 향한 숭고한 갈망</text:span><text:span/></text:p>
      <text:p text:style-name="P144"><text:span text:style-name="T776">이 최고의 깨달음인 대보리를 향한 갈망은 단순히 세상의 무언가를 갖고 싶어 하는 거친 욕심과는 차원이 완전히 달라. 마치 어두컴컴한 미로 속에 갇혀서 떨고 있는 사람들을 구하기 위해 스스로 온 세상을 환하게 비추는 태양이 되겠다는 숭고한 서원과 같지. 이 갈망이 마음속 깊은 곳에서 강력하게 타오를 때, 우리의 의식은 비로소 윤회의 단단한 사슬을 끊어낼 강력한 추진력을 얻게 돼. 내면의 깊은 잠에서 깨어나 궁극의 진리를 향해 나아가는 첫걸음이 바로 이 간절</text:span><text:span text:style-name="T777">한 바람에서 시작되는 거야.</text:span><text:span/></text:p>
      <text:p text:style-name="P145"><text:span text:style-name="T778">🗺️ 길을 잃지 않게 돕는 스승의 내비게이션</text:span><text:span/></text:p>
      <text:p text:style-name="P146"><text:span text:style-name="T779">이 위대한 여정을 안전하고 정밀하게 완수하기 위해서는 앞서 이 길을 완벽하게 걸어간 선지식, 즉 스승들이 전해준 바른 방편이 반드시 필요해. 아무리 성능이 뛰어난 슈퍼카를 가지고 있어도, 한 번도 가보지 못한 복잡한 초행길에서 정확한 내비게이션의 안내가 없다면 결국 길을 잃고 헤매거나 벼랑 끝으로 떨어지기 십상이잖아. 역사 속에서 수많은 검증을 거쳐 내려온 성자들의 정밀한 지침서야말로, 우리가 시행착오 없이 곧바로 깨달음의 중심부로 도달하게 만들어주는 가</text:span><text:span text:style-name="T780">장 완벽한 지도이자 나침반이야.</text:span><text:span/></text:p>
      <text:p text:style-name="P147"><text:span text:style-name="T781">🔑 보물창고를 여는 황금 열쇠의 전수</text:span><text:span/></text:p>
      <text:p text:style-name="P148"><text:span text:style-name="T782">그래서 이 게송은 최고의 지혜를 구하는 귀한 인연들에게 역대 조사들과 스승들이 남겨준 가장 핵심적인 수행 비결을 아낌없이 펼쳐 보이겠다는 위대한 선언을 담고 있어. 깊은 동굴 속에 숨겨진 거대한 보물창고의 자물쇠를 열 수 있는 황금 열쇠를 아무런 대가 없이 건네주듯, 삶과 죽음의 신비를 풀고 성불에 이르는 정교한 방법론을 하나씩 가르쳐 주겠다는 약속이지. 이 가르침을 신뢰하고 온전히 마음을 열어 받아들일 때, 우리의 내면은 한층 더 단단하게 도약할 수 있</text:span><text:span text:style-name="T783">는 완벽한 기회를 맞이하게 돼.</text:span><text:span/></text:p>
      <text:p text:style-name="P149"><text:span text:style-name="T784">📝 핵심 요약</text:span><text:span/></text:p>
      <text:list text:style-name="WWNum7" text:continue-numbering="true">
        <text:list-item>
          <text:p text:style-name="P150"><text:span text:style-name="T785">뛰어난 유정은 모든 생명을 구하겠다는 원대한 서원을 품은 상근기의 수행자를 뜻한다.</text:span><text:span/></text:p>
        </text:list-item>
        <text:list-item>
          <text:p text:style-name="P151"><text:span text:style-name="T786">대보리에 대한 희구는 윤회의 사슬을 끊고 궁극의 깨달음으로 나아가게 하는 핵심 동력이다.</text:span><text:span/></text:p>
        </text:list-item>
        <text:list-item>
          <text:p text:style-name="P152"><text:span text:style-name="T787">스승들이 전해준 바른 방편은 시행착오 없이 목적지에 도달하도록 돕는 내비게이션과 같다.</text:span><text:span/></text:p>
        </text:list-item>
        <text:list-item>
          <text:p text:style-name="P153"><text:span text:style-name="T788">검증된 성자들의 지침을 온전히 따를 때 영적 도약과 성불의 기회를 확실하게 거머쥘 수 있다.</text:span><text:span/></text:p>
        </text:list-item>
      </text:list>
      <text:p text:style-name="P154"><text:span><text:soft-page-break/></text:span><text:span/></text:p>
      <text:p text:style-name="P155"><text:span text:style-name="T789">[🟢 Online Mode | 26.06.08_12:37:51]</text:span><text:span/></text:p>
      <text:p text:style-name="P156"><text:span text:style-name="T790">7. 시공간을 초월한 깨달음의 상징과 정성 어린 공양</text:span><text:span/></text:p>
      <text:p text:style-name="P157"><text:span text:style-name="T791">🔑 핵심 키워드: 제불의 탱화와 소상, 불탑과 불경, 꽃과 향, 정성스러운 공양</text:span><text:span/></text:p>
      <text:p text:style-name="P158"><text:span text:style-name="T792">🎨 거룩한 형상과 마음의 마주함</text:span><text:span/></text:p>
      <text:p text:style-name="P159"><text:span text:style-name="T793">부처님의 모습을 그린 탱화나 조각한 소상을 바라보는 것은 단순히 예술품을 감상하는 차원이 아니야. 이것은 인생의 깊은 방황 속에서 우리를 바른 길로 인도해 준 위대한 인생 멘토의 사진을 방 한가운데 정성스럽게 걸어두고 매일 마주하는 것과 같지. 그 신성한 형상을 정면으로 마주하는 순간, 우리 내면에 잠재되어 있던 깊은 존경심과 고요한 평정심이 자연스럽게 깨어나게 돼.</text:span><text:span/></text:p>
      <text:p text:style-name="P160"><text:span text:style-name="T794">📜 진리와 가르침의 살아있는 상징물</text:span><text:span/></text:p>
      <text:p text:style-name="P161"><text:span text:style-name="T795">깨달은 이들의 사리를 모신 불탑과 그분들의 가르침이 담긴 불경은 부처님의 마음과 말씀이 고스란히 살아 숨 쉬는 통로야. 인생의 온갖 수수께끼를 풀어낼 수 있는 비밀이 담긴 고대의 보물 지도나, 분야 최고의 거장이 남긴 핵심 교과서를 소중히 다루는 모습을 떠올려봐. 이 상징물들을 향해 마음을 모으는 것만으로도 우리는 시공간을 넘어 부처님의 생생한 지혜와 곧바로 연결될 수 있어.</text:span><text:span/></text:p>
      <text:p text:style-name="P162"><text:span text:style-name="T796">🌸 향기롭고 아름다운 마음의 표현</text:span><text:span/></text:p>
      <text:p text:style-name="P163"><text:span text:style-name="T797">부처님과 가르침 앞에 꽃을 바치고 향을 피우는 행위는 내면의 순수한 존경과 감사를 시각적이고 후각적인 아름다움으로 표현하는 방법이야. 우리가 정말로 아끼고 존경하는 소중한 분의 집을 방문할 때, 그분이 좋아하는 화사한 꽃다발이나 은은한 향초를 정성껏 준비해 가는 마음과 똑같지. 피어오르는 향 연기와 아름다운 꽃은 우리의 거친 마음을 맑고 깨끗하게 정화해 주는 훌륭한 매개체가 되어줘.</text:span><text:span/></text:p>
      <text:p text:style-name="P164"><text:span text:style-name="T798">💎 형편에 맞춘 최선의 정성</text:span><text:span/></text:p>
      <text:p text:style-name="P165"><text:span text:style-name="T799">경전에서 공물들을 힘껏 장만하라고 한 것은 결코 비새고 화려한 물건을 무리해서 가져오라는 뜻이 아니야. 자기가 처한 형편과 상황 속에서 준비할 수 있는 가장 순수한 정성을 다하라는 의미지. 어린아이가 부모님을 사랑하는 순전한 마음을 담아 삐뚤삐뚤하게 그려서 선물한 손편지가 그 어떤 비싼 선물보다 부모의 마음을 깊이 울리는 것과 같은 이치야. 물질의 가격표가 아니라 그 안에 담긴 진실한 마음의 깊이가 진정한 공양의 핵심인 셈이지.</text:span><text:span/></text:p>
      <text:p text:style-name="P166"><text:span text:style-name="T800">📝 핵심 요약</text:span><text:span/></text:p>
      <text:list text:style-name="WWNum8" text:continue-numbering="true">
        <text:list-item>
          <text:p text:style-name="P167"><text:span text:style-name="T801">부처님의 탱화와 소상을 마주하며 내면의 존경심과 고요함을 깨워냄.</text:span><text:span/></text:p>
        </text:list-item>
        <text:list-item>
          <text:p text:style-name="P168"><text:span text:style-name="T802">불탑과 불경은 깨달은 이의 말씀과 마음이 담긴 살아있는 진리의 상징임.</text:span><text:span/></text:p>
        </text:list-item>
        <text:list-item>
          <text:p text:style-name="P169"><text:span text:style-name="T803">꽃과 향을 바치는 행위는 존경하는 이를 향한 가장 순수하고 아름다운 표현임.</text:span><text:span/></text:p>
        </text:list-item>
        <text:list-item>
          <text:p text:style-name="P170"><text:span text:style-name="T804">공양의 본질은 물질의 화려함이 아니라 자기가 할 수 있는 최선의 정성을 담는 데 있음.</text:span><text:span/></text:p>
        </text:list-item>
      </text:list>
      <text:p text:style-name="P171"><text:span><text:soft-page-break/></text:span><text:span/></text:p>
      <text:p text:style-name="P172"><text:span text:style-name="T805">8. 보현행원의 칠지공양과 흔들리지 않는 보리심</text:span><text:span/></text:p>
      <text:p text:style-name="P173"><text:span text:style-name="T806">🔑 핵심 키워드: 보현행원, 칠지공양, 보리의 정수, 불퇴전</text:span><text:span/></text:p>
      <text:p text:style-name="P174"><text:span text:style-name="T807">🙏 보현행원이라는 위대한 영적 지도</text:span><text:span/></text:p>
      <text:p text:style-name="P175"><text:span text:style-name="T808">보현행원은 우리가 깨달음이라는 최고의 목적지에 도달하기 위해 반드시 지녀야 할 가장 완벽한 영적 지도와 같아. 끝없는 우주 속에서 방향을 잃지 않고 똑바로 나아가려면 신뢰할 수 있는 내비게이션이 필요한데, 이 게송이 바로 그 역할을 해주는 거지. 우리가 일상에서 마주하는 수많은 유혹과 혼란 속에서도 마음의 중심을 잡고 가장 가치 있는 길을 선택할 수 있도록 이끌어주는 든든한 나침반이 되어준단다.</text:span><text:span/></text:p>
      <text:p text:style-name="P176"><text:span text:style-name="T809">✨ 칠지공양이라는 마음의 대청소</text:span><text:span/></text:p>
      <text:p text:style-name="P177"><text:span text:style-name="T810">여기서 말하는 칠지공양은 우리 마음의 때를 깨끗하게 닦아내고 위대한 공덕을 쌓는 일곱 가지 정교한 단계야. 평소에 방을 깨끗이 청소하고 아름다운 꽃과 향으로 공간을 장식하듯이, 예배와 찬탄과 공양 등 일곱 가지 실천을 통해 내면의 부정적인 에너지를 완전히 리셋하는 과정이지. 마음이라는 그릇에 묻은 더러운 얼룩을 깨끗이 씻어내야만 비로소 깨달음이라는 순수한 지혜의 물을 온전하게 담아낼 수 있는 법이야.</text:span><text:span/></text:p>
      <text:p text:style-name="P178"><text:span text:style-name="T811">🎯 보리의 정수라는 최종 목적지</text:span><text:span/></text:p>
      <text:p text:style-name="P179"><text:span text:style-name="T812">우리가 이토록 정성스럽게 공양을 올리고 마음을 닦는 최종 목적지는 바로 보리의 정수, 즉 완전히 완성된 궁극의 깨달음이야. 마라톤 선수가 수많은 고개를 넘고 숨이 턱 끝까지 차오르는 고통을 견디며 마침내 도달하려는 최종 결승선과 완전히 똑같아. 겉으로 보이는 소소한 행복이나 일시적인 평온에 만족하며 적당히 멈추는 것이 아니라, 우주의 모든 진리를 온전히 깨닫는 최고의 자리를 향해 시선을 고정하는 웅장한 여정이지.</text:span><text:span/></text:p>
      <text:p text:style-name="P180"><text:span text:style-name="T813">⚓ 결코 뒤돌아보지 않는 불퇴전의 선언</text:span><text:span/></text:p>
      <text:p text:style-name="P181"><text:span text:style-name="T814">가장 중요한 것은 목적지에 닿을 때까지 절대로 뒤로 물러서지 않겠다는 불퇴전의 견고한 마음을 내는 일이야. 거센 폭풍우가 몰아치고 사나운 파도가 배를 뒤흔들어도, 바다 깊은 곳에 묵직한 닻을 내린 거대한 군함처럼 끄떡없이 자리를 지키는 결연한 의지와 같아. 어떤 어려움이나 장애물이 앞길을 가로막아도 중간에 포기하거나 타협하지 않고 끝까지 나아가겠다는 이 단단한 약속이야말로 성불을 이루는 가장 강력한 추진력이 된단다.</text:span><text:span/></text:p>
      <text:p text:style-name="P182"><text:span text:style-name="T815">📝 핵심 요약</text:span><text:span/></text:p>
      <text:list text:style-name="WWNum9" text:continue-numbering="true">
        <text:list-item>
          <text:p text:style-name="P183"><text:span text:style-name="T816">보현행원은 깨달음의 여정에서 방향을 잃지 않게 돕는 영적 나침반임</text:span><text:span/></text:p>
        </text:list-item>
        <text:list-item>
          <text:p text:style-name="P184"><text:span text:style-name="T817">칠지공양을 통해 마음의 얼룩을 깨끗이 정화하고 지혜를 담을 그릇을 준비함</text:span><text:span/></text:p>
        </text:list-item>
        <text:list-item>
          <text:p text:style-name="P185"><text:span text:style-name="T818">최종 목표인 보리의 정수를 향해 시선을 고정하고 흔들림 없이 나아감</text:span><text:span/></text:p>
        </text:list-item>
        <text:list-item>
          <text:p text:style-name="P186"><text:span text:style-name="T819">어떤 시련에도 결코 뒤돌아보지 않는 불퇴전의 서원이 성불의 원동력임</text:span><text:span/></text:p>
        </text:list-item>
      </text:list>
      <text:p text:style-name="P187"><text:span><text:soft-page-break/></text:span><text:span/></text:p>
      <text:p text:style-name="P188"><text:span text:style-name="T820">[🟢 Online Mode | 26.06.08_12:38:41]</text:span><text:span/></text:p>
      <text:p text:style-name="P189"><text:span text:style-name="T821">9. 삼보에 대한 굳건한 신뢰와 삼귀의의 의례</text:span><text:span/></text:p>
      <text:p text:style-name="P190"><text:span text:style-name="T822">🔑 핵심 키워드: 삼보, 신뢰, 삼귀의, 합장, 무릎 꿇기, 의식</text:span><text:span/></text:p>
      <text:p text:style-name="P191"><text:span text:style-name="T823">🧭 인생의 거친 바다를 건너는 나침반</text:span><text:span/></text:p>
      <text:p text:style-name="P192"><text:span text:style-name="T824">수행의 길에 나설 때 가장 먼저 필요한 것은 불법승 삼보에 대한 흔들리지 않는 단단한 믿음이야. 이것은 마치 아무것도 보이지 않는 캄캄한 밤바다를 항해하는 배가 오직 북극성이나 정밀한 나침반 하나만을 전적으로 의지하며 나아가는 것과 같지. 세상의 수많은 유혹과 혼란 속에서 내가 가야 할 올바른 방향을 제시해 주는 절대적인 기준점을 내 마음속에 세우는 첫걸음이야.</text:span><text:span/></text:p>
      <text:p text:style-name="P193"><text:span text:style-name="T825">🙇 아집과 교만을 내려놓는 가장 낮은 자세</text:span><text:span/></text:p>
      <text:p text:style-name="P194"><text:span text:style-name="T826">마음의 믿음을 가졌다면 이제 그것을 몸으로 표현할 차례야. 두 무릎을 땅 위에 꿇는 신체적인 자세는 단순히 무릎을 굽히는 행동을 넘어, 내 마음속에 가득 차 있던 아집과 교만이라는 단단한 껍질을 깨뜨리고 가장 겸손한 상태로 돌아가겠다는 선언이지. 컵에 물을 채우려면 컵을 물병보다 아래로 낮춰야 하듯이, 최고의 가르침을 내 안으로 온전히 받아들이기 위해 나를 가장 낮은 곳에 두는 아름다운 준비 과정이야.</text:span><text:span/></text:p>
      <text:p text:style-name="P195"><text:span text:style-name="T827">🤝 흩어진 마음의 에너지를 하나로 모으는 합장</text:span><text:span/></text:p>
      <text:p text:style-name="P196"><text:span text:style-name="T828">두 손을 공손히 가슴 앞에 모으는 합장은 사방으로 산만하게 흩어져 있던 내 마음의 안테나들을 하나의 초점으로 모으는 정교한 튜닝 작업과 같아. 왼손과 오른손이 만나 하나가 되듯, 내 안의 음과 양, 이성과 감정의 에너지를 완벽하게 일치시켜 오직 진리를 향해 집중하겠다는 강력한 신호지. 이 작은 몸짓을 통해 주위의 소음은 가라앉고 오롯이 성스러운 의식 속으로 깊이 몰입할 수 있게 돼.</text:span><text:span/></text:p>
      <text:p text:style-name="P197"><text:span text:style-name="T829">🔔 마음에 세 번 새기는 영혼의 서약</text:span><text:span/></text:p>
      <text:p text:style-name="P198"><text:span text:style-name="T830">모든 준비가 끝나면 삼귀의를 세 번 정성스럽게 소리 내어 고하게 돼. 한 번은 내 지성으로 이해하고, 두 번은 내 가슴으로 감동하며, 세 번은 내 온 삶을 바쳐 실천하겠다는 다짐이지. 이는 중요한 계약서에 도장을 꾹꾹 눌러 찍거나, 잊지 말아야 할 핵심 기억을 머릿속에 세 번 반복해서 저장하는 안전장치와 같아. 세 번의 진심 어린 고백을 통해 삼보의 가르침은 내 잠재의식 가장 깊은 곳에 지워지지 않는 영원의 낙인으로 새겨지게 된단다.</text:span><text:span/></text:p>
      <text:p text:style-name="P199"><text:span text:style-name="T831">📝 핵심 요약</text:span><text:span/></text:p>
      <text:list text:style-name="WWNum10" text:continue-numbering="true">
        <text:list-item>
          <text:p text:style-name="P200"><text:span text:style-name="T832">수행의 시작은 불법승 삼보에 대한 굳건하고 흔들림 없는 신뢰로부터 출발한다.</text:span><text:span/></text:p>
        </text:list-item>
        <text:list-item>
          <text:p text:style-name="P201"><text:span text:style-name="T833">무릎을 꿇는 신체적 자세는 스스로의 교만을 낮추고 가르침을 받아들이는 겸손을 의미한다.</text:span><text:span/></text:p>
        </text:list-item>
        <text:list-item>
          <text:p text:style-name="P202"><text:span text:style-name="T834">공손히 합장하는 몸짓은 분산된 마음과 에너지를 하나로 모아 의식에 집중하게 한다.</text:span><text:span/></text:p>
        </text:list-item>
        <text:list-item>
          <text:p text:style-name="P203"><text:span text:style-name="T835">삼귀의를 세 번 반복하는 행위는 지성과 감성, 행동 모두를 통틀어 영원의 서약을 새기는 과정이다.</text:span><text:span/></text:p>
        </text:list-item>
      </text:list>
      <text:p text:style-name="P204"><text:span><text:soft-page-break/></text:span><text:span/></text:p>
      <text:p text:style-name="P205"><text:span text:style-name="T836">[🟢 Online Mode | 26.06.08_12:46:00]</text:span><text:span/></text:p>
      <text:p text:style-name="P206"><text:span text:style-name="T837">10. 모든 생명을 향한 사랑과 고통에 대한 통찰</text:span><text:span/></text:p>
      <text:p text:style-name="P207"><text:span text:style-name="T838">🔑 핵심 키워드: 자심, 모든 유정, 삼악도, 윤회의 고통, 자비의 첫걸음</text:span><text:span/></text:p>
      <text:p text:style-name="P208"><text:span text:style-name="T839">❤️ 모든 이를 향해 품는 따뜻한 봄볕</text:span><text:span/></text:p>
      <text:p text:style-name="P209"><text:span text:style-name="T840">삼귀의를 마치고 나면 이제 나의 마음을 내가 아닌 세상의 모든 생명에게로 넓혀야 하는 단계가 찾아와. 가르침에서는 이를 자심이라고 부르는데, 이는 조건 없이 모든 생명이 행복하기를 바라는 지극히 순수한 사랑의 마음이야. 마치 추운 겨울을 녹이고 세상의 모든 새싹을 차별 없이 골고루 비추는 따뜻한 봄볕과 같지. 나에게 잘해주는 사람뿐만 아니라 아무런 상관이 없는 존재들까지도 내 마음의 품 안으로 따뜻하게 안아주는 연습을 시작하는 거야.</text:span><text:span/></text:p>
      <text:p text:style-name="P210"><text:span text:style-name="T841">🌱 거대한 나무를 키워내는 비옥한 땅</text:span><text:span/></text:p>
      <text:p text:style-name="P211"><text:span text:style-name="T842">왜 본격적인 통찰에 앞서서 이 사랑의 마음을 먼저 행해야 할까? 자심은 위대한 깨달음이라는 거대한 나무를 키워내기 위한 가장 비옥한 바탕흙이 되기 때문이야. 메마르고 딱딱한 모래밭에는 아무리 좋은 씨앗을 뿌려도 싹이 트지 못하듯, 마음속에 사랑과 자비가 메말라 있다면 그 어떤 깊은 가르침도 내면에서 자라날 수 없거든. 모든 존재를 향한 따뜻한 시선을 먼저 장착해야만 비로소 타인의 아픔을 진심으로 이해할 수 있는 단단한 기초가 다져지게 돼.</text:span><text:span/></text:p>
      <text:p text:style-name="P212"><text:span text:style-name="T843">🌪️ 깊은 늪에 갇힌 존재들을 향한 시선</text:span><text:span/></text:p>
      <text:p text:style-name="P213"><text:span text:style-name="T844">사랑의 눈을 뜨고 세상을 바라보면 마침내 보이지 않던 거대한 고통의 바다가 눈앞에 드러나기 시작해. 특히 지옥, 아귀, 축생이라는 삼악도의 거친 세계에 태어나 신음하는 수많은 유정들이 시선에 들어오지. 이들은 마치 출구 없는 깊은 늪에 빠져 허우적거리며 스스로의 힘으로는 절대 빠져나올 수 없는 절망적인 상태에 놓여 있어. 이들의 비참한 현실을 외면하지 않고 온전히 마주하는 것이 바로 다음 단계로 나아가는 중요한 통로가 된단다.</text:span><text:span/></text:p>
      <text:p text:style-name="P214"><text:span text:style-name="T845">🔄 멈추지 않고 돌아가는 고통의 쳇바퀴</text:span><text:span/></text:p>
      <text:p text:style-name="P215"><text:span text:style-name="T846">삼악도의 고통은 단 한 번으로 끝나지 않고 탄생과 죽음, 그리고 다른 세계로의 이주라는 끊임없는 순환을 통해 계속해서 이어져. 이것은 마치 다람쥐가 지쳐 쓰러질 때까지 멈추지 않고 계속해서 돌려야 하는 거대한 쳇바퀴와 아주 비슷하지. 한곳에서 죽으면 또 다른 고통스러운 몸을 받아 다시 태어나고, 그 무거운 짐을 진 채 끝없이 방황해야 하는 윤회의 서글픈 흐름을 명확하게 인지할 때, 우리는 비로소 이 가혹한 굴레를 벗어나겠다는 강력한 동기를 얻게 돼.</text:span><text:span/></text:p>
      <text:p text:style-name="P216"><text:span text:style-name="T847">📝 핵심 요약</text:span><text:span/></text:p>
      <text:list text:style-name="WWNum11" text:continue-numbering="true">
        <text:list-item>
          <text:p text:style-name="P217"><text:span text:style-name="T848">모든 수행의 기초로서 세상의 모든 생명이 행복하기를 바라는 자심을 먼저 일으킨다.</text:span><text:span/></text:p>
        </text:list-item>
        <text:list-item>
          <text:p text:style-name="P218"><text:span text:style-name="T849">자심은 깨달음의 씨앗을 싹틔우기 위해 마음을 부드럽게 만드는 비옥한 바탕흙과 같다.</text:span><text:span/></text:p>
        </text:list-item>
        <text:list-item>
          <text:p text:style-name="P219"><text:span text:style-name="T850">사랑의 시선으로 지옥, 아귀, 축생의 삼악도에서 고통받는 존재들의 현실을 통찰한다.</text:span><text:span/></text:p>
        </text:list-item>
        <text:list-item>
          <text:p text:style-name="P220"><text:span text:style-name="T851">탄생과 죽음, 이주로 이어지는 끊임없는 윤회의 쳇바퀴 속 고통을 인식하며 구원의 마음을 낸다.</text:span><text:span/></text:p>
        </text:list-item>
      </text:list>
      <text:p text:style-name="P221"><text:span><text:soft-page-break/></text:span><text:span/><text:span/></text:p>
      <text:p text:style-name="P222"><text:span><text:soft-page-break/></text:span><text:span/><text:span/></text:p>
      <text:p text:style-name="P223"><text:span text:style-name="T852">11. 중생을 향한 대자비와 결코 물러서지 않는 보리심의 발기</text:span><text:span/></text:p>
      <text:p text:style-name="P224"><text:span text:style-name="T853">🔑 핵심 키워드: 삼고의 괴로움, 중생 해탈, 불퇴전의 서약, 보리심</text:span><text:span/></text:p>
      <text:p text:style-name="P225"><text:span text:style-name="T854">👁️ 세상 모든 중생을 향한 깊은 시선</text:span><text:span/></text:p>
      <text:p text:style-name="P226"><text:span text:style-name="T855">우리가 살아가는 이 세상에는 수많은 생명체들이 저마다의 무거운 짐을 지고 살아가고 있어. 이 게송은 우주에 존재하는 단 한 명의 중생도 놓치지 않고 그들이 처한 비참한 상황을 아주 정밀하게 관찰하는 것에서부터 시작해. 이것은 마치 대형 재난 현장을 목격한 구조대원이 헬기를 타고 상공에서 조난자들의 위치를 샅샅이 파악하며 가슴 아파하는 몰입과 공감의 상태와 아주 비슷하다고 볼 수 있어.</text:span><text:span/></text:p>
      <text:p text:style-name="P227"><text:span text:style-name="T856">📦 우리를 짓누르는 세 가지 고통의 보따리</text:span><text:span/></text:p>
      <text:p text:style-name="P228"><text:span text:style-name="T857">불교에서는 중생이 겪는 괴로움을 삼고라는 세 가지 유형으로 정교하게 분류하고 있어. 이를 쉽게 이해하기 위해 표로 정리해 볼게.</text:span><text:span/></text:p>
      <table:table table:style-name="ta2">
        <table:table-columns>
          <table:table-column table:style-name="co3"/>
          <table:table-column table:style-name="co4"/>
          <table:table-column table:style-name="co5"/>
        </table:table-columns>
        <table:table-header-rows>
          <table:table-row table:style-name="ro5" table:default-cell-style-name="ce10">
            <table:table-cell table:style-name="ce11">
              <text:p text:style-name="P229"><text:span text:style-name="T858">고통의 종류</text:span><text:span/></text:p>
            </table:table-cell>
            <table:table-cell table:style-name="ce12">
              <text:p text:style-name="P230"><text:span text:style-name="T859">현실적인 의미</text:span><text:span/></text:p>
            </table:table-cell>
            <table:table-cell table:style-name="ce13">
              <text:p text:style-name="P231"><text:span text:style-name="T860">일상적인 비유</text:span><text:span/></text:p>
            </table:table-cell>
          </table:table-row>
        </table:table-header-rows>
        <table:table-row table:style-name="ro6" table:default-cell-style-name="ce10">
          <table:table-cell table:style-name="ce14">
            <text:p text:style-name="P232"><text:span text:style-name="T861">고고</text:span><text:span/></text:p>
          </table:table-cell>
          <table:table-cell table:style-name="ce15">
            <text:p text:style-name="P233"><text:span text:style-name="T862">대놓고 밀려오는 육체적, 정신적 아픔</text:span><text:span/></text:p>
          </table:table-cell>
          <table:table-cell table:style-name="ce16">
            <text:p text:style-name="P234"><text:span text:style-name="T863">날카로운 송곳에 살을 찔리는 정면의 고통</text:span><text:span/></text:p>
          </table:table-cell>
        </table:table-row>
        <table:table-row table:style-name="ro7" table:default-cell-style-name="ce10">
          <table:table-cell table:style-name="ce17">
            <text:p text:style-name="P235"><text:span text:style-name="T864">괴고</text:span><text:span/></text:p>
          </table:table-cell>
          <table:table-cell table:style-name="ce18">
            <text:p text:style-name="P236"><text:span text:style-name="T865">행복과 즐거움이 사라질 때 생기는 상실감</text:span><text:span/></text:p>
          </table:table-cell>
          <table:table-cell table:style-name="ce19">
            <text:p text:style-name="P237"><text:span text:style-name="T866">달콤한 아이스크림이 손 위에서 녹아내릴 때의 씁쓸함</text:span><text:span/></text:p>
          </table:table-cell>
        </table:table-row>
        <table:table-row table:style-name="ro8" table:default-cell-style-name="ce10">
          <table:table-cell table:style-name="ce20">
            <text:p text:style-name="P238"><text:span text:style-name="T867">행고</text:span><text:span/></text:p>
          </table:table-cell>
          <table:table-cell table:style-name="ce21">
            <text:p text:style-name="P239"><text:span text:style-name="T868">조건 지어진 존재 자체가 가진 불안정함</text:span><text:span/></text:p>
          </table:table-cell>
          <table:table-cell table:style-name="ce22">
            <text:p text:style-name="P240"><text:span text:style-name="T869">언제 터질지 모르는 시한폭탄을 품고 살아가는 불안함</text:span><text:span/></text:p>
          </table:table-cell>
        </table:table-row>
      </table:table>
      <text:p text:style-name="P241"><text:span text:style-name="T870">🪵 고통의 뿌리를 통째로 뽑아내는 해탈의 원력</text:span><text:span/></text:p>
      <text:p text:style-name="P242"><text:span text:style-name="T871">진정한 자비는 단순히 눈앞에 보이는 아픔을 잠시 달래주는 것에 그치지 않아. 중생들이 겪는 근본적인 고통과, 그 고통을 끊임없이 만들어내는 원인인 탐욕과 성냄, 어리석음의 뿌리를 완전히 박멸하는 것이 목표지. 마당에 돋아난 잡초의 잎사귀만 대충 가위로 잘라내면 금방 다시 자라나잖아. 흙을 깊이 파내어 단단하게 박힌 뿌리까지 통째로 캐내는 유능한 정원사처럼, 괴로움의 원인 자체를 소멸시키겠다는 거대한 결심이야.</text:span><text:span/></text:p>
      <text:p text:style-name="P243"><text:span text:style-name="T872">🚀 결코 뒤돌아보지 않는 편도행 보리심의 로켓</text:span><text:span/></text:p>
      <text:p text:style-name="P244"><text:span text:style-name="T873">모든 중생을 반드시 구제하겠다는 이 위대한 마음을 바로 보리심이라고 부르는데, 여기에는 불퇴전이라는 강력한 서약이 함께 묶여 있어. 불퇴전은 도중에 아무리 힘들고 지치는 순간이 와도 결코 포기하거나 옛날의 이기적인 모습으로 되돌아가지 않겠다는 단호한 다짐이야. 마치 지구를 떠나 저 멀리 미지의 우주를 향해 나아가는 탐사선이 돌아올 연료를 남겨두지 않고 오직 전진만을 향해 편도행 티켓을 끊고 발사되는 장엄한 모습과 같아.</text:span><text:span/></text:p>
      <text:p text:style-name="P245"><text:span text:style-name="T874">📝 핵심 요약</text:span><text:span/></text:p>
      <text:list text:style-name="WWNum12" text:continue-numbering="true">
        <text:list-item>
          <text:p text:style-name="P246"><text:span text:style-name="T875">우주의 모든 중생이 처한 괴로움의 실상을 외면하지 않고 샅샅이 살피는 자비심에서 출발함.</text:span><text:span/></text:p>
        </text:list-item>
        <text:list-item>
          <text:p text:style-name="P247"><text:span text:style-name="T876">중생은 고고, 괴고, 행고라는 세 가지 차원의 무거운 고통 속에서 신음하고 있음.</text:span><text:span/></text:p>
        </text:list-item>
        <text:list-item>
          <text:p text:style-name="P248"><text:span text:style-name="T877">임시방편이 아니라 고통의 근본 원인까지 완벽하게 제거하여 해탈시키겠다는 원력을 세움.</text:span><text:span/></text:p>
        </text:list-item>
        <text:list-item>
          <text:p text:style-name="P249"><text:span text:style-name="T878">어떤 역경이 찾아와도 결코 뒤로 물러서지 않는 불퇴전의 보리심을 내면에서 일으킴.</text:span><text:span/></text:p>
        </text:list-item>
      </text:list>
      <text:p text:style-name="P250"><text:span><text:soft-page-break/></text:span><text:span/><text:span/></text:p>
      <text:p text:style-name="P251"><text:span text:style-name="T879">[🟢 Online Mode | 26.06.08_12:47:01]</text:span><text:span/></text:p>
      <text:p text:style-name="P252"><text:span text:style-name="T880">12. 원보리심의 위대한 공덕과 화엄경의 증언</text:span><text:span/></text:p>
      <text:p text:style-name="P253"><text:span text:style-name="T881">🔑 핵심 키워드: 원보리심, 화엄경, 미륵보살, 입법계품, 복덕의 가치</text:span><text:span/></text:p>
      <text:p text:style-name="P254"><text:span text:style-name="T882">🌱 깨달음을 향한 순수한 첫 마음의 씨앗</text:span><text:span/></text:p>
      <text:p text:style-name="P255"><text:span text:style-name="T883">원보리심은 모든 생명을 고통에서 구하고 함께 깨달음을 얻겠다는 순수한 서원이자 마음의 첫 단추야. 이것은 마치 우리가 거대한 우주선에 올라타기 전에 "반드시 저 우주 너머의 별에 도달하겠다"고 굳게 결심하는 여행의 출발지와 같지. 아직 실제로 엔진을 켜고 움직이지는 않았더라도 방향을 정확하게 정하는 것만으로도 엄청난 항해 에너지가 내면에서 뿜어져 나오기 시작하는 법이야.</text:span><text:span/></text:p>
      <text:p text:style-name="P256"><text:span text:style-name="T884">📖 화엄경 속 미륵보살의 위대한 증언</text:span><text:span/></text:p>
      <text:p text:style-name="P257"><text:span text:style-name="T885">이 아름다운 마음을 낸 사람에게 얼마나 거대한 공덕과 복이 따르는지에 대해, 대승불교의 위대한 경전인 화엄경 속 미륵보살님이 아주 자세하게 설명해 주셨어. 경전의 입법계품을 보면 구도자인 선재동자가 미륵보살을 만났을 때, 원보리심이 가진 무한한 가치를 끝없는 찬탄으로 밝혀주시지. 이는 세계 최고의 권위자가 보증하는 완벽한 영적 인증서와 같아서 수행자들에게 엄청난 용기와 확신을 주는 든든한 등불이 된단다.</text:span><text:span/></text:p>
      <text:p text:style-name="P258"><text:span text:style-name="T886">💎 무한한 가능성을 품은 작은 보석의 비유</text:span><text:span/></text:p>
      <text:p text:style-name="P259"><text:span text:style-name="T887">미륵보살님이 설명하신 이 공덕은 아주 작은 불씨 하나가 거대한 벌판을 모두 태울 수 있는 강력한 잠재력을 지닌 것과 비슷해. 비록 지금 당장은 마음속의 아주 작은 다짐처럼 보일지라도, 온 우주를 가득 채우고도 남을 만큼 찬란한 보석 원석이 내면에 들어선 것이나 다름없지. 이 마음을 품는 순간, 우리는 평범한 이방인에서 붓다의 가문을 이어받을 위대한 상속자로 완전히 신분이 수직 상승하게 되는 거야.</text:span><text:span/></text:p>
      <text:p text:style-name="P260"><text:span text:style-name="T888">🚀 온 우주를 움직이는 위대한 영적 도약</text:span><text:span/></text:p>
      <text:p text:style-name="P261"><text:span text:style-name="T889">결국 이 원보리심의 복덕은 단순히 나 혼자 착하게 살겠다는 다짐을 넘어 온 우주의 긍정적인 에너지를 내 편으로 만드는 강력한 자석과 같아. 미륵보살의 가르침대로 이 마음에 의지할 때, 우리의 평범했던 일상은 위대한 깨달음의 여정으로 완벽하게 변모하지. 삶의 모든 순간이 복덕의 바다로 화하는 이 신비로운 도약이야말로 우리가 깨달음의 길에서 만날 수 있는 가장 아름다운 기적이란다.</text:span><text:span/></text:p>
      <text:p text:style-name="P262"><text:span text:style-name="T890">📝 핵심 요약</text:span><text:span/></text:p>
      <text:list text:style-name="WWNum13" text:continue-numbering="true">
        <text:list-item>
          <text:p text:style-name="P263"><text:span text:style-name="T891">원보리심은 모든 중생을 구제하겠다는 순수한 깨달음의 서원이자 영적 여정의 출발점이다.</text:span><text:span/></text:p>
        </text:list-item>
        <text:list-item>
          <text:p text:style-name="P264"><text:span text:style-name="T892">대승 경전인 화엄경 입법계품에서 미륵보살이 원보리심의 무한한 공덕을 상세히 증언했다.</text:span><text:span/></text:p>
        </text:list-item>
        <text:list-item>
          <text:p text:style-name="P265"><text:span text:style-name="T893">작은 다짐처럼 보이는 이 마음은 온 우주를 채울 만한 거대한 지혜의 씨앗과 같다.</text:span><text:span/></text:p>
        </text:list-item>
        <text:list-item>
          <text:p text:style-name="P266"><text:span text:style-name="T894">이 위대한 원력을 품는 순간 평범한 삶이 불법을 상속받는 고결한 여정으로 변화한다.</text:span><text:span/></text:p>
        </text:list-item>
      </text:list>
      <text:p text:style-name="P267"><text:span><text:soft-page-break/></text:span><text:span/><text:span/></text:p>
      <text:p text:style-name="P268"><text:span text:style-name="T895">[🔴 Offline Mode | 26.06.08_12:47:09]</text:span><text:span/></text:p>
      <text:p text:style-name="P269"><text:span text:style-name="T896">13. 경전을 읽고 스승에게 들으며 거듭하는 발심</text:span><text:span/></text:p>
      <text:p text:style-name="P270"><text:span text:style-name="T897">🔑 핵심 키워드: 계경 독송, 스승의 가르침, 보리심의 공덕, 거듭된 발심, 상주</text:span><text:span/></text:p>
      <text:p text:style-name="P271"><text:span text:style-name="T898">📖 가르침을 접하는 두 가지 통로, 경전과 스승</text:span><text:span/></text:p>
      <text:p text:style-name="P272"><text:span text:style-name="T899">위대한 깨달음의 길로 나아가기 위한 첫걸음은 올바른 가르침을 전해주는 경전을 스스로 깊이 읽거나, 앞서 그 길을 걸어간 현명한 스승님의 목소리를 통해 직접 듣는 것에서 시작해. 이것은 마치 우리가 낯선 목적지를 향해 여행을 떠날 때, 정밀하게 그려진 보물지도 조각을 꼼꼼히 들여다보거나 길을 잘 아는 베테랑 가이드의 친절한 설명을 귀담아듣는 것과 아주 비슷하단다. 이 두 가지 소중한 통로를 통해 우리는 비로소 평소에는 전혀 알지 못했던 마음의 참된 보물지도</text:span><text:span text:style-name="T900">를 눈앞에 활짝 펼치게 되는 거지.</text:span><text:span/></text:p>
      <text:p text:style-name="P273"><text:span text:style-name="T901">💎 한계가 없는 보리심의 끝없는 공덕</text:span><text:span/></text:p>
      <text:p text:style-name="P274"><text:span text:style-name="T902">경전과 스승을 통해 우리가 반드시 깨달아야 하는 핵심은 바로 원만한 보리심이 지닌 가치와 끝이 없는 무변한 공덕들이야. 보리심은 모든 생명체를 구하겠다는 거룩한 마음인데, 이 마음이 품고 있는 긍정적인 에너지는 온 우주를 채우고도 남을 만큼 거대하거든. 마치 어두운 방 안에 작은 촛불 하나를 켜는 것이 아니라, 온 세상을 한꺼번에 환하게 비추는 거대한 태양을 마음속에 품는 것과 같아. 이 위대한 공덕의 크기를 올바르게 이해하고 머릿속에 잘 기억해 두는 것</text:span><text:span text:style-name="T903">이 영적 성장의 든든한 기초가 된단다.</text:span><text:span/></text:p>
      <text:p text:style-name="P275"><text:span text:style-name="T904">🔄 마음의 불꽃을 매일 다시 지피는 거듭된 발심</text:span><text:span/></text:p>
      <text:p text:style-name="P276"><text:span text:style-name="T905">보리심의 위대한 가치를 잘 이해했다면, 그것을 한 번의 다짐으로 끝내지 말고 매일의 일상 속에서 거듭거듭 새로 발심해야 해. 우리의 마음은 부드러운 진흙 같아서 가만히 놔두면 금방 원래의 거칠고 이기적인 모습으로 굳어버리기 쉽거든. 그렇기 때문에 마치 꺼져가는 캠프파이어 불꽃에 신선한 장작을 끊임없이 던져 넣어 불길을 다시 살려내듯, 혹은 세계적인 음악가가 매일 아침 악기를 조율하고 연습하듯 선한 마음의 주파수를 끊임없이 다시 맞추고 일깨우는 정성이 반드</text:span><text:span text:style-name="T906">시 필요해.</text:span><text:span/></text:p>
      <text:p text:style-name="P277"><text:span text:style-name="T907">⚓ 흔들리지 않는 깨달음의 마음을 상주시키는 법</text:span><text:span/></text:p>
      <text:p text:style-name="P278"><text:span text:style-name="T908">이렇게 매 순간 발심을 반복하는 이유는 깨달음을 향한 고귀한 마음이 내면에서 한순간도 떠나지 않고 늘 머무르도록, 즉 상주하게 만들기 위함이야. 거친 파도가 몰아치는 바다 한가운데서 배가 멀리 떠내려가지 않도록 아주 무겁고 단단한 앵커를 바다 깊숙이 내리는 과정과 똑같은 이치지. 가르침을 듣고 깨달은 공덕의 기억들을 매일 마음의 중심에 굳건히 붙잡아 둠으로써, 어떤 유혹이나 시련이 찾아와도 결코 흔들리지 않는 단단하고 온전한 깨달음의 주춧돌을 비로소 완성</text:span><text:span text:style-name="T909">하게 되는 거란다.</text:span><text:span/></text:p>
      <text:p text:style-name="P279"><text:span text:style-name="T910">📝 핵심 요약</text:span><text:span/></text:p>
      <text:list text:style-name="WWNum14" text:continue-numbering="true">
        <text:list-item>
          <text:p text:style-name="P280"><text:span text:style-name="T911">깨달음의 길을 가기 위해 경전을 스스로 읽거나 스승의 가르침을 귀담아들어야 함.</text:span><text:span/></text:p>
        </text:list-item>
        <text:list-item>
          <text:p text:style-name="P281"><text:span text:style-name="T912">가르침을 통해 모든 생명을 구하려는 원만한 보리심이 지닌 무한한 공덕을 올바르게 이해함.</text:span><text:span/></text:p>
        </text:list-item>
        <text:list-item>
          <text:p text:style-name="P282"><text:span text:style-name="T913">한 번의 다짐에 그치지 않고 장작을 더하듯 일상 속에서 거듭거듭 선한 발심을 반복함.</text:span><text:span/></text:p>
        </text:list-item>
        <text:list-item>
          <text:p text:style-name="P283"><text:span text:style-name="T914">반복적인 발심을 통해 고귀한 마음이 내면에 완전히 정착하여 늘 상주하도록 만듦.</text:span><text:span/></text:p>
        </text:list-item>
      </text:list>
      <text:p text:style-name="P284"><text:span><text:soft-page-break/></text:span><text:span/><text:span/></text:p>
      <text:p text:style-name="P285"><text:span text:style-name="T915">14. 근수청문경의 가르침과 복덕의 증명</text:span><text:span/></text:p>
      <text:p text:style-name="P286"><text:span text:style-name="T916">🔑 핵심 키워드: 근수청문경, 복덕, 보리심, 게송 요약, 대승의 가치</text:span><text:span/></text:p>
      <text:p text:style-name="P287"><text:span text:style-name="T917">📜 경전에 담긴 무량한 복덕의 증명</text:span><text:span/></text:p>
      <text:p text:style-name="P288"><text:span text:style-name="T918">이 게송은 이타적인 깨달음의 마음인 보리심이 얼마나 거대하고 위대한 가치를 지니고 있는지 증명하기 위해 근수청문경이라는 유서 깊은 경전을 인용하고 있어. 이 경전은 보리심을 일으켰을 때 쌓이는 영적인 자산인 복덕의 크기를 아주 상세하게 설명해 주지. 우리가 은행에 엄청난 액수의 저축을 해두면 아무런 걱정 없이 든든한 것처럼, 보리심이라는 위대한 마음을 품는 순간 우주 공간을 가득 채우고도 남을 만큼 무량한 복덕의 창고가 내면에 열리게 되는 셈이야.</text:span><text:span/></text:p>
      <text:p text:style-name="P289"><text:span text:style-name="T919">💎 핵심만을 담아내는 보물 상자</text:span><text:span/></text:p>
      <text:p text:style-name="P290"><text:span text:style-name="T920">스승 아티샤는 이처럼 광대하고 깊은 경전의 가르침 중에서 가장 핵심이 되는 에센스만을 골라 딱 세 개의 게송으로 요약해서 우리에게 전해주려고 해. 수백 페이지에 달하는 두꺼운 백과사전의 내용을 가장 핵심적인 요약본 파일 하나로 압축해서 전달하는 과정과 완벽하게 일치하지. 덕분에 우리는 복잡한 길을 헤매지 않고, 가장 정제된 지혜의 정수만을 아주 쉽고 명확하게 깨달을 수 있는 엄청난 혜택을 누리게 되는 거야.</text:span><text:span/></text:p>
      <table:table table:style-name="ta3">
        <table:table-columns>
          <table:table-column table:style-name="co6"/>
          <table:table-column table:style-name="co7"/>
          <table:table-column table:style-name="co8"/>
        </table:table-columns>
        <table:table-header-rows>
          <table:table-row table:style-name="ro9" table:default-cell-style-name="ce23">
            <table:table-cell table:style-name="ce24">
              <text:p text:style-name="P291"><text:span text:style-name="T921">구분</text:span><text:span/></text:p>
            </table:table-cell>
            <table:table-cell table:style-name="ce25">
              <text:p text:style-name="P292"><text:span text:style-name="T922">경전 원문의 상태</text:span><text:span/></text:p>
            </table:table-cell>
            <table:table-cell table:style-name="ce26">
              <text:p text:style-name="P293"><text:span text:style-name="T923">요약된 게송의 상태</text:span><text:span/></text:p>
            </table:table-cell>
          </table:table-row>
        </table:table-header-rows>
        <table:table-row table:style-name="ro10" table:default-cell-style-name="ce23">
          <table:table-cell table:style-name="ce27">
            <text:p text:style-name="P294"><text:span text:style-name="T924">분량과 형식</text:span><text:span/></text:p>
          </table:table-cell>
          <table:table-cell table:style-name="ce28">
            <text:p text:style-name="P295"><text:span text:style-name="T925">방대하고 상세한 긴 설명</text:span><text:span/></text:p>
          </table:table-cell>
          <table:table-cell table:style-name="ce29">
            <text:p text:style-name="P296"><text:span text:style-name="T926">단 세 구절의 압축된 핵심</text:span><text:span/></text:p>
          </table:table-cell>
        </table:table-row>
        <table:table-row table:style-name="ro11" table:default-cell-style-name="ce23">
          <table:table-cell table:style-name="ce30">
            <text:p text:style-name="P297"><text:span text:style-name="T927">전달의 목적</text:span><text:span/></text:p>
          </table:table-cell>
          <table:table-cell table:style-name="ce31">
            <text:p text:style-name="P298"><text:span text:style-name="T928">복덕의 무량함을 전면 증명</text:span><text:span/></text:p>
          </table:table-cell>
          <table:table-cell table:style-name="ce32">
            <text:p text:style-name="P299"><text:span text:style-name="T929">수행자가 즉각 이해하도록 도움</text:span><text:span/></text:p>
          </table:table-cell>
        </table:table-row>
      </table:table>
      <text:list text:style-name="WWNum15" text:continue-numbering="true">
        <text:list-item>
          <text:p text:style-name="P300"><text:span text:style-name="T930">가치 인식: 보리심의 무한한 공덕을 확신함</text:span><text:span/></text:p>
        </text:list-item>
        <text:list-item>
          <text:p text:style-name="P301"><text:span text:style-name="T931">방편 수행: 압축된 지혜를 바탕으로 실천함</text:span><text:span/></text:p>
        </text:list-item>
      </text:list>
      <text:p text:style-name="P302"><text:span text:style-name="T932">📝 핵심 요약</text:span><text:span/></text:p>
      <text:list text:style-name="WWNum15" text:continue-numbering="true">
        <text:list-item>
          <text:p text:style-name="P303"><text:span text:style-name="T933">근수청문경은 보리심을 발했을 때 생겨나는 영적 자산인 복덕의 크기를 상세히 증명하는 경전이야.</text:span><text:span/></text:p>
        </text:list-item>
        <text:list-item>
          <text:p text:style-name="P304"><text:span text:style-name="T934">무한한 저축처럼 보리심은 우주를 채우고도 남을 거대한 공덕의 창고를 열어줘.</text:span><text:span/></text:p>
        </text:list-item>
        <text:list-item>
          <text:p text:style-name="P305"><text:span text:style-name="T935">방대한 경전의 핵심 가르침을 단 세 개의 게송으로 압축하여 수행자가 쉽게 이해하도록 돕고 있어.</text:span><text:span/></text:p>
        </text:list-item>
        <text:list-item>
          <text:p text:style-name="P306"><text:span text:style-name="T936">복잡한 백과사전을 요약본으로 보듯, 정제된 지혜의 정수를 통해 대승의 길을 명확히 제시해 줘.</text:span><text:span/></text:p>
        </text:list-item>
      </text:list>
      <text:p text:style-name="P307"><text:span><text:soft-page-break/></text:span><text:span/><text:span/></text:p>
      <text:p text:style-name="P308"><text:span text:style-name="T937"/><text:span text:style-name="T938"/><text:span text:style-name="T939"/></text:p>
      <text:p text:style-name="P309"><text:span text:style-name="T940">[🟢 Online Mode | 26.06.08_12:47:39]</text:span><text:span/></text:p>
      <text:p text:style-name="P310"><text:span text:style-name="T941">15. 끝없이 넘쳐나는 보리심의 무한한 복덕</text:span><text:span/></text:p>
      <text:p text:style-name="P311"><text:span text:style-name="T942">🔑 핵심 키워드: 보리심, 복덕, 무한한 형체, 허공계, 대자비</text:span><text:span/></text:p>
      <text:p text:style-name="P312"><text:span text:style-name="T943">🌱 우주보다 거대한 보리심의 씨앗</text:span><text:span/></text:p>
      <text:p text:style-name="P313"><text:span text:style-name="T944">보리심은 모든 생명을 고통에서 구하고 함께 깨달음을 얻겠다는 가장 고귀하고 이타적인 마음이야. 이 보리심을 가슴에 품었을 때 쌓이는 영적인 공덕인 복덕은 우리가 눈으로 보거나 상상할 수 없을 정도로 거대하지. 비유하자면, 지상의 그 어떤 거대한 부자의 금고나 은행 시스템으로도 감히 담아낼 수 없을 만큼 엄청난 가치를 지닌 무한대의 자산이 내 의식 속에 통째로 생성되는 것과 같아.</text:span><text:span/></text:p>
      <text:p text:style-name="P314"><text:span text:style-name="T945">🌌 끝없는 우주 공간을 채우는 가상의 형체</text:span><text:span/></text:p>
      <text:p text:style-name="P315"><text:span text:style-name="T946">게송에서는 만약 이 보리심의 복덕에 눈에 보이는 단단한 형태나 부피가 존재한다고 가정하면, 끝없이 넓은 허공계를 완벽하게 채우고도 남는다고 설명해.</text:span><text:span/></text:p>
      <text:p text:style-name="P316"><text:span text:style-name="T947">복덕의 공간적 스케일:</text:span><text:span/></text:p>
      <text:list text:style-name="WWNum16" text:continue-numbering="true">
        <text:list-item>
          <text:p text:style-name="P317"><text:span text:style-name="T948">수천억 개의 은하계가 끝없이 펼쳐진 광활한 대우주</text:span><text:span/></text:p>
        </text:list-item>
        <text:list-item>
          <text:p text:style-name="P318"><text:span text:style-name="T949">그 거대한 우주 공간 전체에 단 한 뼘의 틈새도 없이 복덕의 입자가 가득 차는 상태</text:span><text:span/></text:p>
        </text:list-item>
        <text:list-item>
          <text:p text:style-name="P319"><text:span text:style-name="T950">우리가 매일 밤 바라보는 밤하늘의 무한한 공간이 오롯이 이 선한 마음이 만들어낸 눈부신 빛의 알갱이들로 빽빽하게 메워지는 장엄한 광경을 상상해 보면 이해하기 쉬울 거야.</text:span><text:span/></text:p>
        </text:list-item>
      </text:list>
      <text:p text:style-name="P320"><text:span text:style-name="T951">🌊 온 우주를 채우고도 넘쳐나는 무한함</text:span><text:span/></text:p>
      <text:p text:style-name="P321"><text:span text:style-name="T952">더욱 놀라운 것은 이 복덕의 크기가 거대한 우주 공간을 다 채우는 것에 그치지 않고, 오히려 그릇 밖으로 찰랑거리며 뿜어져 나온다는 점이야. 아주 커다란 욕조에 물을 가득 채우다 못해 넘쳐나서 사방으로 물줄기가 콸콸 흘러내리는 것처럼 말이지. 온 우주라는 세상에서 가장 거대한 그릇을 가져와서 담으려고 해도, 보리심이 가진 무한한 영적 에너지를 온전히 다 가두기에는 턱없이 부족하다는 뜻이란다.</text:span><text:span/></text:p>
      <text:p text:style-name="P322"><text:span text:style-name="T953">💎 이타성이 만들어내는 기적의 연금술</text:span><text:span/></text:p>
      <text:p text:style-name="P323"><text:span text:style-name="T954">보리심의 복덕이 이토록 무한한 스케일을 가지는 이유는, 그 마음의 대상이 나 한 사람이 아니라 온 우주의 모든 생명을 향하고 있기 때문이야. 내 방 한 칸만 겨우 밝히는 작은 촛불은 금방 꺼지지만, 온 세상을 비추는 태양빛은 한계가 없는 것과 같은 이치지. '모든 유정을 구하겠다'는 거대한 사랑의 주파수가 시공간의 벽을 완전히 깨부수고 무한한 우주의 크기와 공명하며 일어나는 기적의 연금술인 셈이야.</text:span><text:span/></text:p>
      <text:p text:style-name="P324"><text:span text:style-name="T955">📝 핵심 요약</text:span><text:span/></text:p>
      <text:list text:style-name="WWNum16" text:continue-numbering="true">
        <text:list-item>
          <text:p text:style-name="P325"><text:span text:style-name="T956">보리심은 모든 생명을 구하겠다는 이타적인 마음이며, 이로 인해 쌓이는 복덕은 상상을 초월한다.</text:span><text:span/></text:p>
        </text:list-item>
        <text:list-item>
          <text:p text:style-name="P326"><text:span text:style-name="T957">보리심의 복덕에 만약 물리적인 형체가 있다면 광활한 우주 공간인 허공계를 가득 채울 수 있다.</text:span><text:span/></text:p>
        </text:list-item>
        <text:list-item>
          <text:p text:style-name="P327"><text:span text:style-name="T958">이 복덕은 우주라는 가장 큰 그릇으로도 다 담지 못해 오히려 밖으로 넘쳐날 정도로 무한하다.</text:span><text:span/></text:p>
        </text:list-item>
        <text:list-item>
          <text:p text:style-name="P328"><text:span text:style-name="T959">개인의 영달을 넘어 모든 생명을 향하는 이타적인 원력이기에 시공간을 초월하는 거대한 힘을 갖는다.</text:span><text:span/></text:p>
        </text:list-item>
      </text:list>
      <text:p text:style-name="P329"><text:span><text:soft-page-break/></text:span><text:span/><text:span/></text:p>
      <text:p text:style-name="P330"><text:span text:style-name="T960">[🟢 Online Mode | 26.06.08_12:47:45]</text:span><text:span/></text:p>
      <text:p text:style-name="P331"><text:span text:style-name="T961">16. 우주적 보시의 비유와 물질적 공양의 한계</text:span><text:span/></text:p>
      <text:p text:style-name="P332"><text:span text:style-name="T962">🔑 핵심 키워드: 갠지스강 모래알, 부처님 정토, 보석 보시, 세간의 의호</text:span><text:span/></text:p>
      <text:p text:style-name="P333"><text:span text:style-name="T963">🌌 갠지스강 모래알처럼 무한한 우주의 스케일</text:span><text:span/></text:p>
      <text:p text:style-name="P334"><text:span text:style-name="T964">인도에 흐르는 거대한 갠지스강변의 모래알을 상상해봐. 그 수많은 모래알 하나하나를 각각 하나의 거대한 우주 정토라고 가상하는 거야. 전 세계 모든 해수욕장의 모래알 수만큼 수많은 스마트폰 화면이 있고, 그 화면마다 독립된 가상 세계가 펼쳐져 있는 것과 같은 엄청난 스케일이지. 밀교의 게송은 우리의 상상력을 우주적인 차원으로 확장하며, 인간의 머리로는 도저히 계산할 수 없는 무한한 공간의 개념을 먼저 제시하고 있어.</text:span><text:span/></text:p>
      <text:p text:style-name="P335"><text:span text:style-name="T965">💎 세상의 모든 보석을 가득 채우는 물질적 풍요</text:span><text:span/></text:p>
      <text:p text:style-name="P336"><text:span text:style-name="T966">이렇게 셀 수 없이 많은 정토의 공간마다 온갖 진귀한 보석과 다이아몬드, 황금을 빈틈없이 가득 채운다고 생각해봐. 우리가 상상할 수 있는 가장 거대한 창고에 전 세계의 모든 부를 때려 넣고도 모자라, 우주 전체를 보물상자로 만드는 엄청난 물질적 보시를 의미하는 거지. 이것은 인간이 물질 세계에서 행할 수 있는 가장 위대하고 완벽한 형태의 자선이자 최고의 풍요를 상징하는 행동이야.</text:span><text:span/></text:p>
      <text:p text:style-name="P337"><text:span text:style-name="T967">👑 세간의 의호이신 부처님께 올리는 고귀한 공양</text:span><text:span/></text:p>
      <text:p text:style-name="P338"><text:span text:style-name="T968">이 엄청난 우주적 보물을 세간의 의호, 즉 중생들을 고통에서 건져주시는 절대적인 인도자이신 부처님께 온 마음을 다해 공양물로 올리는 장면이야. 최고의 가치를 지닌 대상을 위해 우주 전체의 물질적 부를 아낌없이 바치는 정성이지. 마치 세상에서 가장 존경하는 스승님께 자신이 가진 가장 가치 있는 전 재산을 선물하는 것을 넘어, 온 지구의 보물을 모아 바치는 것과 같은 지극한 정성과 믿음의 표현이야.</text:span><text:span/></text:p>
      <text:p text:style-name="P339"><text:span text:style-name="T969">⚖️ 거대한 물질적 공양 뒤에 숨겨진 위대한 반전</text:span><text:span/></text:p>
      <text:p text:style-name="P340"><text:span text:style-name="T970">이 게송은 여기서 문장이 끝나지 않고 다음 구절을 향해 달리는 거대한 생략법을 쓰고 있어. 우주를 보석으로 채워 바치는 이 엄청난 공덕조차도, 깨달음을 향한 단 한 줄의 진리를 깨닫거나 마음을 닦는 정신적 수행의 가치에 비하면 아무것도 아니라는 엄청난 반전을 준비하는 서막인 셈이지. 아무리 값비싼 다이아몬드를 수조 개 가지고 있어도 내면의 어둠을 밝히는 단 하나의 지혜의 등불이 없다면 결국 미로 속에서 헤맬 수밖에 없다는 진리를 암시하고 있어.</text:span><text:span/></text:p>
      <text:p text:style-name="P341"><text:span text:style-name="T971">📝 핵심 요약</text:span><text:span/></text:p>
      <text:list text:style-name="WWNum17" text:continue-numbering="true">
        <text:list-item>
          <text:p text:style-name="P342"><text:span text:style-name="T972">갠지스강의 모래알만큼 무한한 수의 부처님 정토라는 장엄한 우주적 스케일을 제시한다.</text:span><text:span/></text:p>
        </text:list-item>
        <text:list-item>
          <text:p text:style-name="P343"><text:span text:style-name="T973">그 무수한 공간 속에 세상의 모든 진귀한 보석을 가득 채운 극치의 물질적 보시를 가정한다.</text:span><text:span/></text:p>
        </text:list-item>
        <text:list-item>
          <text:p text:style-name="P344"><text:span text:style-name="T974">이 우주적인 보물을 중생의 구원자이신 세간의 의호 부처님께 최고의 정성으로 공양한다.</text:span><text:span/></text:p>
        </text:list-item>
        <text:list-item>
          <text:p text:style-name="P345"><text:span text:style-name="T975">이러한 엄청난 물질적 공덕도 내면의 지혜를 밝히는 정신적 수행의 가치를 돋보이게 하기 위한 장치이다.</text:span><text:span/></text:p>
        </text:list-item>
      </text:list>
      <text:p text:style-name="P346"><text:span><text:soft-page-break/></text:span><text:span/><text:span/></text:p>
      <text:p text:style-name="P347"><text:span text:style-name="T976">17. 보리심의 발현과 한계가 없는 최고의 공양</text:span><text:span/></text:p>
      <text:p text:style-name="P348"><text:span text:style-name="T977">🔑 핵심 키워드: 합장, 대보리, 마음의 경배, 변제 없는 공양</text:span><text:span/></text:p>
      <text:p text:style-name="P349"><text:span text:style-name="T978">🙏 두 손을 모으는 합장의 진정한 가치</text:span><text:span/></text:p>
      <text:p text:style-name="P350"><text:span text:style-name="T979">두 손을 공손히 모으는 합장은 겉보기에는 아주 단순한 몸짓처럼 보이지만, 실제로는 내면에 흩어져 있던 모든 주의 집중과 정신적 에너지를 한곳으로 모으는 정교한 스위치야. 마치 스마트폰을 켜기 위해 화면의 지문 인식 센서에 손가락을 정확히 갖다 대는 순간, 잠겨 있던 모든 시스템이 일시에 활성화되는 것과 아주 똑같지. 이 작은 몸짓을 통해 우리는 분별심으로 가득했던 일상의 소음을 끄고, 가장 경건하고 순수한 상태로 깨달음의 세계를 마주할 준비를 마치게 돼.</text:span><text:span/></text:p>
      <text:p text:style-name="P351"><text:span text:style-name="T980">🎯 깨달음을 향해 마음의 돛을 올리기</text:span><text:span/></text:p>
      <text:p text:style-name="P352"><text:span text:style-name="T981">대보리, 즉 모든 중생을 구제하겠다는 궁극의 깨달음을 향해 마음을 온전히 기울이는 것은 우리 삶의 방향타를 완전히 바꾸는 영적 대전환이야. 광활한 바다 한가운데서 거센 바람이 불어올 때, 돛의 방향을 바람의 흐름에 맞추어 정확하게 고정해야 배가 원하는 목적지를 향해 힘차게 전진할 수 있는 것과 같은 이치지. 마음의 시선을 나라는 좁은 울타리에서 벗어나 온 우주와 중생이라는 거대한 목표로 고정하는 순간, 평범했던 우리의 일상은 깨달음으로 나아가는 강력한 항</text:span><text:span text:style-name="T982">해로 바뀌어.</text:span><text:span/></text:p>
      <text:p text:style-name="P353"><text:span text:style-name="T983">💎 물질을 초월하는 순수한 영적 선물</text:span><text:span/></text:p>
      <text:p text:style-name="P354"><text:span text:style-name="T984">세상의 그 어떤 진귀한 보석이나 화려한 꽃을 바치는 물질적인 공양도, 마음속에서 깊이 우러나오는 순수한 보리심의 가치를 결코 뛰어넘을 수 없어. 아무리 값비싸고 화려한 가구들을 가득 사 들고 집에 찾아오는 손님보다, 나를 진심으로 아끼고 사랑하는 연인이 건네는 따뜻한 눈빛과 포옹 한 번이 내 마음에 훨씬 더 깊은 감동을 주는 것과 똑같은 이치야. 물질은 결국 시간이 지나면 변하고 사라지지만, 깨달음을 향한 진실한 마음은 결코 닳거나 훼손되지 않는 최고의 </text:span><text:span text:style-name="T985">영적 선물이 되지.</text:span><text:span/></text:p>
      <text:p text:style-name="P355"><text:span text:style-name="T986">🌊 끝없이 펼쳐지는 무한한 공덕의 바다</text:span><text:span/></text:p>
      <text:p text:style-name="P356"><text:span text:style-name="T987">이렇게 보리심을 바탕으로 올리는 경배와 공양에는 그 끝과 한계를 지정할 수 없을 만큼 무한한 공덕이 샘솟게 돼. 작은 컵에 담긴 물은 뜨거운 햇볕 아래서 금방 증발해 사라지지만, 그 물방울을 거대한 태평양 바다에 던져 넣으면 바다가 마르지 않는 한 영원히 그 존재를 유지하며 파도치잖아. 이처럼 한계가 없는 대보리의 마음에 내 의식을 연결하는 순간, 우리가 쌓는 작은 선업과 공덕도 우주의 크기만큼 무한하게 확장되어 결코 마르지 않는 지혜의 바다를 이루게 되</text:span><text:span text:style-name="T988">는 거야.</text:span><text:span/></text:p>
      <text:p text:style-name="P357"><text:span text:style-name="T989">📝 핵심 요약</text:span><text:span/></text:p>
      <text:list text:style-name="WWNum18" text:continue-numbering="true">
        <text:list-item>
          <text:p text:style-name="P358"><text:span text:style-name="T990">두 손을 모으는 합장은 내면의 분산된 에너지를 하나로 모으는 정교한 영적 스위치임.</text:span><text:span/></text:p>
        </text:list-item>
        <text:list-item>
          <text:p text:style-name="P359"><text:span text:style-name="T991">대보리를 향해 마음을 기울이는 것은 삶의 방향을 궁극의 깨달음으로 고정하는 과정임.</text:span><text:span/></text:p>
        </text:list-item>
        <text:list-item>
          <text:p text:style-name="P360"><text:span text:style-name="T992">진심 어린 마음의 경배는 세상의 그 어떤 화려한 물질적 공양보다 훨씬 더 차원이 높음.</text:span><text:span/></text:p>
        </text:list-item>
        <text:list-item>
          <text:p text:style-name="P361"><text:span text:style-name="T993">보리심을 바탕으로 한 공양은 바다에 던져진 물방울처럼 한계 없이 무한한 공덕을 지님.</text:span><text:span/></text:p>
        </text:list-item>
      </text:list>
      <text:p text:style-name="P362"><text:span><text:soft-page-break/></text:span><text:span/><text:span/></text:p>
      <text:p text:style-name="P363"><text:span text:style-name="T994">18. 원보리심의 발원과 대자비의 확장</text:span><text:span/></text:p>
      <text:p text:style-name="P364"><text:span text:style-name="T995">🔑 핵심 키워드: 원보리심, 불퇴전의 노력, 타생의 기억, 학처 호지</text:span><text:span/></text:p>
      <text:p text:style-name="P365"><text:span text:style-name="T996">🌱 원보리심이라는 소중한 씨앗의 발아</text:span><text:span/></text:p>
      <text:p text:style-name="P366"><text:span text:style-name="T997">모든 중생을 구원하겠다는 위대한 다짐인 원보리심을 가슴속에 품는 것은 영적인 여정의 가장 아름다운 시작이야. 이것은 마치 황무지 같던 마음 밭에 세상에서 가장 귀하고 아름다운 꽃의 씨앗을 깊숙이 심는 것과 같아. 아직은 눈에 보이지 않는 작은 다짐에 불과할지라도 그 안에는 온 우주를 환하게 밝힐 엄청난 잠재력이 숨어 있지.</text:span><text:span/></text:p>
      <text:p text:style-name="P367"><text:span text:style-name="T998">💧 끊임없는 노력으로 피워내는 깨달음의 나무</text:span><text:span/></text:p>
      <text:p text:style-name="P368"><text:span text:style-name="T999">이 귀한 씨앗을 심었다면 이제는 수많은 노력을 아끼지 않고 정성스레 돌보아야 해. 좋은 씨앗도 가만히 내버려 두면 싹을 틔우지 못하고 말라 죽듯이 우리의 깨달음을 향한 마음도 매일 자비와 지혜의 물을 주며 키워가야 하거든. 매일 정성껏 물을 주고 비료를 주며 정성을 들이면 작은 씨앗이 마침내 거대한 나무가 되어 수많은 이들에게 시원한 그늘을 내어주는 기적이 일어나게 돼.</text:span><text:span/></text:p>
      <text:p text:style-name="P369"><text:span text:style-name="T1000">☁️ 다음 생으로 이어지는 영혼의 클라우드 백업</text:span><text:span/></text:p>
      <text:p text:style-name="P370"><text:span text:style-name="T1001">우리가 이토록 원보리심을 소중히 가꾸는 이유는 이 마음을 이번 생뿐만 아니라 다음 생에서도 잊지 않고 기억하기 위해서야. 몸이 바뀌고 새로운 세상에 태어나더라도 내가 세운 위대한 서원을 고스란히 이어받아야 하니까 말이지. 스마트폰을 새로 바꿀 때 소중한 데이터와 사진들을 미리 가상의 저장 공간에 안전하게 백업해 두면 새 기기에서도 그대로 불러올 수 있는 원리와 완벽하게 똑같아.</text:span><text:span/></text:p>
      <text:p text:style-name="P371"><text:span text:style-name="T1002">🛡️ 학처라는 단단한 울타리의 수호</text:span><text:span/></text:p>
      <text:p text:style-name="P372"><text:span text:style-name="T1003">이 소중한 서원이 영혼의 저장 공간에 안전하게 저장되도록 돕는 비밀 열쇠가 바로 경전에서 가르쳐준 부지런한 학처들의 호지야. 부처님이 당부하신 행동 지침과 마음가짐을 소중하게 지켜내는 것은 거센 바람과 야생동물로부터 어린 새싹을 보호하는 단단한 울타리를 세우는 일과 같아. 이 울타리가 우리 마음을 든든하게 지켜줄 때 원보리심은 시공간을 초월해 영원히 빛나는 지혜로 완성된단다.</text:span><text:span/></text:p>
      <text:p text:style-name="P373"><text:span text:style-name="T1004">📝 핵심 요약</text:span><text:span/></text:p>
      <text:list text:style-name="WWNum19" text:continue-numbering="true">
        <text:list-item>
          <text:p text:style-name="P374"><text:span text:style-name="T1005">모든 중생을 구원하겠다는 원보리심을 내는 것은 깨달음의 귀한 씨앗을 심는 첫 단계임</text:span><text:span/></text:p>
        </text:list-item>
        <text:list-item>
          <text:p text:style-name="P375"><text:span text:style-name="T1006">발원한 마음이 말라 죽지 않도록 매일 끊임없는 노력과 실천으로 마음을 가꾸어야 함</text:span><text:span/></text:p>
        </text:list-item>
        <text:list-item>
          <text:p text:style-name="P376"><text:span text:style-name="T1007">이번 생의 서원을 다음 생까지 잊지 않고 이어가기 위한 정교한 기억의 저장이 필요함</text:span><text:span/></text:p>
        </text:list-item>
        <text:list-item>
          <text:p text:style-name="P377"><text:span text:style-name="T1008">경전에서 설한 학처들을 온전히 수호하고 지키는 것이 보리심을 유지하는 단단한 울타리가 됨</text:span><text:span/></text:p>
        </text:list-item>
      </text:list>
      <text:p text:style-name="P378"><text:span><text:soft-page-break/></text:span><text:span/><text:span/></text:p>
      <text:p text:style-name="P379"><text:span text:style-name="T1009">[🟢 Online Mode | 26.06.08_12:50:00]</text:span><text:span/></text:p>
      <text:p text:style-name="P380"><text:span text:style-name="T1010">19. 원심을 완성하는 행심의 규범과 다짐</text:span><text:span/></text:p>
      <text:p text:style-name="P381"><text:span text:style-name="T1011">🔑 핵심 키워드: 행심의 율의, 진정한 원심, 원만보리, 율의 수지</text:span><text:span/></text:p>
      <text:p text:style-name="P382"><text:span text:style-name="T1012">🌱 마음의 씨앗과 실천이라는 대지</text:span><text:span/></text:p>
      <text:p text:style-name="P383"><text:span text:style-name="T1013">깨달음을 얻겠다는 순수한 바람인 원심은 생명의 시작을 알리는 소중한 씨앗과 같아. 하지만 아무리 건강하고 훌륭한 씨앗을 가지고 있어도, 그것을 심고 가꿀 수 있는 비옥한 대지가 없다면 결코 싹을 틔우거나 거대한 나무로 자라날 수 없지. 행심의 본질인 율의, 즉 구체적인 도덕적 규범과 실천의 다짐이 바로 그 씨앗이 뿌리를 내릴 수 있는 단단하고 영양가 가득한 흙이 되어주는 거야.</text:span><text:span/></text:p>
      <text:p text:style-name="P384"><text:span text:style-name="T1014">🎈 행동 없는 소망이라는 풍선</text:span><text:span/></text:p>
      <text:p text:style-name="P385"><text:span text:style-name="T1015">구체적인 실천의 규범인 율의를 제외하고 오직 마음속으로만 깨달음을 바라기만 하는 것은 실 가닥이 끊어진 풍선을 바라보는 것과 같아. 바람을 품은 풍선은 하늘 높이 날아오르고 싶어 하지만, 중심을 잡아줄 실과 무게추가 없다면 결국 방향을 잃고 허공에서 터져버리고 말지. 진정한 실천적 약속이 뒷받침되지 않는 결심은 시간이 지나면 흐려지고 마는 신기루일 뿐이야.</text:span><text:span/></text:p>
      <text:p text:style-name="P386"><text:span text:style-name="T1016">🚀 원만한 깨달음을 향한 추진력</text:span><text:span/></text:p>
      <text:p text:style-name="P387"><text:span text:style-name="T1017">모든 중생을 구원하겠다는 원만보리의 거대한 서원이 마음에 가득 차오르고 자라나기를 원한다면, 우리는 반드시 행동이라는 강력한 엔진을 가동해야 해. 율의를 받아들이고 굳건하게 지켜내는 과정은 로켓이 중력을 뚫고 우주로 나아가기 위해 거대한 연료를 태우며 추진력을 얻는 과정과 완벽하게 일치하지. 실천의 약속이 단단해질수록 우리의 깨달음에 대한 원력도 비례해서 엄청나게 거대해지는 법이야.</text:span><text:span/></text:p>
      <text:p text:style-name="P388"><text:span text:style-name="T1018">🛡️ 약속을 몸에 새기는 수지의 가치</text:span><text:span/></text:p>
      <text:p text:style-name="P389"><text:span text:style-name="T1019">그러므로 우리는 온 힘을 다해 이 실천의 규범을 반드시 받아들이고 늘 몸과 마음에 지니고 있어야 해. 비유하자면 거친 바다를 항해하는 선원이 폭풍우 속에서도 배의 중심을 잃지 않기 위해 묵직한 닻을 바다 깊숙이 내리는 것과 같지. 율의를 엄격하게 수지하는 결단이 있을 때만, 우리의 흔들리던 마음은 비로소 어떤 유혹에도 흔들리지 않는 다이아몬드처럼 견고하게 완성될 수 있어.</text:span><text:span/></text:p>
      <text:p text:style-name="P390"><text:span text:style-name="T1020">📝 핵심 요약</text:span><text:span/></text:p>
      <text:list text:style-name="WWNum20" text:continue-numbering="true">
        <text:list-item>
          <text:p text:style-name="P391"><text:span text:style-name="T1021">깨달음을 바라는 원심은 구체적인 실천의 규범인 율의가 뒷받침되어야만 자라날 수 있음.</text:span><text:span/></text:p>
        </text:list-item>
        <text:list-item>
          <text:p text:style-name="P392"><text:span text:style-name="T1022">행동과 약속이 없는 소망은 중심을 잃은 풍선처럼 결국 허공에서 소멸하고 마는 한계를 지님.</text:span><text:span/></text:p>
        </text:list-item>
        <text:list-item>
          <text:p text:style-name="P393"><text:span text:style-name="T1023">원만한 깨달음을 뜻하는 원만보리를 성취하기 위해서는 힘써 실천하는 행심의 에너지가 필수적임.</text:span><text:span/></text:p>
        </text:list-item>
        <text:list-item>
          <text:p text:style-name="P394"><text:span text:style-name="T1024">거친 풍파 속에서 배를 고정하는 닻처럼 실천의 규범을 반드시 수지하여 마음의 중심을 잡아야 함.</text:span><text:span/></text:p>
        </text:list-item>
      </text:list>
      <text:p text:style-name="P395"><text:span><text:soft-page-break/></text:span><text:span/><text:span/></text:p>
      <text:p text:style-name="P396"><text:span text:style-name="T1025">20. 별해탈계라는 기초와 보살계의 자격</text:span><text:span/></text:p>
      <text:p text:style-name="P397"><text:span text:style-name="T1026">🔑 핵심 키워드: 별해탈계, 보살계, 기초 계율, 도덕적 기반, 수행의 자격</text:span><text:span/></text:p>
      <text:p text:style-name="P398"><text:span text:style-name="T1027">🧱 높은 빌딩을 짓기 위한 단단한 기초 공사</text:span><text:span/></text:p>
      <text:p text:style-name="P399"><text:span text:style-name="T1028">우리가 도심 한복판에 하늘을 찌를 듯이 높은 초고층 빌딩을 세우려고 할 때 가장 먼저 해야 할 일이 무엇일까? 바로 땅을 깊게 파고 단단한 콘크리트로 기초를 다지는 공사야. 이처럼 위대한 이타심을 실천하는 보살계라는 높은 건축물을 내 마음속에 세우기 위해서는, 반드시 별해탈계라는 단단한 도덕적 기초 공사가 먼저 선행되어야만 해. 기초가 부실한 건물은 작은 지진에도 쉽게 무너지듯이, 개인의 내면을 다스리는 기본 계율이 없다면 타인을 구원하겠다는 원대한 보살</text:span><text:span text:style-name="T1029">의 서원도 모래성에 불과하니까 말이지.</text:span><text:span/></text:p>
      <text:p text:style-name="P400"><text:span text:style-name="T1030">🛡️ 유혹으로부터 나를 지켜주는 든든한 보호막</text:span><text:span/></text:p>
      <text:p text:style-name="P401"><text:span text:style-name="T1031">불교에서 말하는 칠종의 별해탈계는 우리가 세상을 살아가면서 마주하는 수많은 번뇌와 유혹으로부터 스스로를 안전하게 보호해 주는 정교한 방탄조끼와 같아. 출가자와 재가자의 상황에 맞게 나누어진 일곱 가지 종류의 계율들은, 우리 마음이 탐욕이나 분노라는 거친 파도에 휩쓸려 스스로를 파괴하지 않도록 단단히 붙잡아주는 닻의 역할을 하지. 나를 먼저 통제하고 다스릴 수 있는 이 든든한 방어벽이 마련되어야만, 비로소 타인의 고통을 돌볼 수 있는 여유와 힘이 생겨나는 </text:span><text:span text:style-name="T1032">법이야.</text:span><text:span/></text:p>
      <text:p text:style-name="P402"><text:span text:style-name="T1033">⚖️ 하나의 약속을 항상 유지하는 위대한 지속성</text:span><text:span/></text:p>
      <text:p text:style-name="P403"><text:span text:style-name="T1034">이 가르침에서 아주 흥미로운 점은 일곱 가지 계율을 한꺼번에 완벽하게 지키지 못하더라도, 그중에서 내 상황에 맞는 단 하나의 계율이라도 항상 지니고 실천하는 것이 중요하다는 거야. 이것은 마치 매일 거창한 운동 계획을 세우고 포기하는 것보다, 하루에 한 번 몸을 움직이겠다는 작은 약속 하나를 몇 년 동안 꾸준히 지켜내는 위대한 습관의 힘과 같지. 늘 깨어있는 마음으로 하나의 약속을 성실히 지키는 그 꾸준함이 모여 결국 우리 마음을 깨달음에 최적화된 상태로</text:span><text:span text:style-name="T1035"> 단단하게 성장시켜 주거든.</text:span><text:span/></text:p>
      <text:p text:style-name="P404"><text:span text:style-name="T1036">🎁 보살의 길로 나아가는 영적인 패스포트</text:span><text:span/></text:p>
      <text:p text:style-name="P405"><text:span text:style-name="T1037">기본적인 계율을 항상 품고 살아가는 이들에게는 후일 보살계를 받아 지닐 수 있는 특별한 자격과 복분이 자연스럽게 주어지게 돼. 이것은 외국으로 나가기 위해 반드시 필요한 여권을 손에 쥐는 것과 같아서, 이 도덕적 자격증이 없다면 더 높은 차원의 대승 수행으로 나아가는 문이 결코 열리지 않지. 스스로를 다스리는 힘을 증명한 영혼만이 온 우주의 생명을 구원하겠다는 위대한 보살의 길로 당당하게 걸어 들어갈 수 있는 절대적인 특권을 얻게 되는 셈이야.</text:span><text:span/></text:p>
      <text:p text:style-name="P406"><text:span text:style-name="T1038">📝 핵심 요약</text:span><text:span/></text:p>
      <text:list text:style-name="WWNum21" text:continue-numbering="true">
        <text:list-item>
          <text:p text:style-name="P407"><text:span text:style-name="T1039">보살계라는 고차원적인 서원을 세우기 위해서는 별해탈계라는 도덕적 기초가 필수적이다.</text:span><text:span/></text:p>
        </text:list-item>
        <text:list-item>
          <text:p text:style-name="P408"><text:span text:style-name="T1040">칠종의 별해탈계는 번뇌와 유혹으로부터 스스로를 보호하는 방탄조끼와 같은 역할을 한다.</text:span><text:span/></text:p>
        </text:list-item>
        <text:list-item>
          <text:p text:style-name="P409"><text:span text:style-name="T1041">단 하나의 계율이라도 항상 성실하게 지켜내는 지속성이 마음을 성장시키는 원동력이다.</text:span><text:span/></text:p>
        </text:list-item>
        <text:list-item>
          <text:p text:style-name="P410"><text:span text:style-name="T1042">개인의 계율을 지키는 힘을 증명한 존재만이 타인을 구원하는 보살계의 자격을 얻는다.</text:span><text:span/></text:p>
        </text:list-item>
      </text:list>
      <text:p text:style-name="P411"><text:span><text:soft-page-break/></text:span><text:span/><text:span/></text:p>
      <text:p text:style-name="P412"><text:span text:style-name="T1043">[🟢 Online Mode | 26.06.08_14:04:14]</text:span><text:span/></text:p>
      <text:p text:style-name="P413"><text:span text:style-name="T1044">21. 계율의 최고봉, 범행과 비구계의 가치</text:span><text:span/></text:p>
      <text:p text:style-name="P414"><text:span text:style-name="T1045">🔑 핵심 키워드: 별해탈계, 범행, 비구계, 여래의 가르침</text:span><text:span/></text:p>
      <text:p text:style-name="P415"><text:span text:style-name="T1046">🛡️ 일곱 가지 해탈의 방패, 별해탈계</text:span><text:span/></text:p>
      <text:p text:style-name="P416"><text:span text:style-name="T1047">여래께서 중생들의 다양한 상황과 역량에 맞추어 일곱 가지 종류의 개인적 해탈을 위한 규칙인 별해탈계를 가르쳐주셨어. 이것은 마치 우리가 소중한 스마트폰을 악성코드와 해킹으로부터 안전하게 보호하기 위해, 각자의 사용 습관에 맞추어 보급형 백신부터 기업용 강력한 방화벽까지 다양한 보안 프로그램을 선택해서 설치하는 것과 아주 비슷해. 각자 서 있는 자리에서 번뇌의 공격을 막아내고 스스로를 지킬 수 있도록 맞춤형 방어구를 선물해 주신 셈이지.</text:span><text:span/></text:p>
      <text:p text:style-name="P417"><text:span text:style-name="T1048">💎 계율의 왕관, 청정한 범행</text:span><text:span/></text:p>
      <text:p text:style-name="P418"><text:span text:style-name="T1049">이 일곱 가지 영적 보안 시스템 중에서도 가장 아름답고 으뜸으로 꼽히는 최고의 가치가 바로 청정한 삶을 뜻하는 범행이야. 단 하나의 미세한 먼지나 오염 물질도 허용하지 않는 첨단 반도체 공장의 초정밀 클린룸을 떠올려봐. 외부의 거친 자극과 내면의 탐욕을 완벽하게 차단하여 마음의 본질을 가장 깨끗하고 투명하게 유지하는, 영적 성장을 위한 최고의 청정 구역을 의미하는 거야.</text:span><text:span/></text:p>
      <text:p text:style-name="P419"><text:span text:style-name="T1050">🏰 흔들리지 않는 성벽, 비구계의 구조</text:span><text:span/></text:p>
      <text:p text:style-name="P420"><text:span text:style-name="T1051">여래께서 말씀하신 고결한 범행의 구체적인 실체가 바로 출가한 스님들이 받아 지키는 비구계야. 수많은 촘촘한 규칙들로 이루어진 이 비구계는 내면의 소중한 보물을 약탈당하지 않도록 겹겹이 에워싼 철통 같은 요새와 같아.</text:span><text:span/></text:p>
      <text:p text:style-name="P421"><text:span text:style-name="T1052">[비구계 요새의 방어 시스템]</text:span><text:span/></text:p>
      <text:p text:style-name="P422"><text:span text:style-name="T1053">- 외부 차단: 세속의 거친 유혹과 집착을 원천 봉쇄</text:span><text:span/></text:p>
      <text:p text:style-name="P423"><text:span text:style-name="T1054">- 내부 단속: 미세하게 일어나는 행동과 생각의 흐름을 실시간 교정</text:span><text:span/></text:p>
      <text:p text:style-name="P424"><text:span text:style-name="T1055">- 효율 극대화: 영적 에너지가 밖으로 새어나가지 않도록 꽉 잡아둠</text:span><text:span/></text:p>
      <text:p text:style-name="P425"><text:span text:style-name="T1056"/><text:span/></text:p>
      <text:p text:style-name="P426"><text:span text:style-name="T1057">🚀 윤회의 중력을 뚫는 가장 강력한 엔진</text:span><text:span/></text:p>
      <text:p text:style-name="P427"><text:span text:style-name="T1058">비구계를 등대 삼아 나아가는 범행의 삶은 우리를 윤회의 무거운 중력권에서 벗어나게 해주는 가장 강력한 로켓 엔진과 같아. 하늘로 높이 날아오르는 로켓이 무게를 줄이기 위해 불필요한 부품을 과감히 분리하듯이, 계율을 통해 복잡한 세속의 짐과 번뇌를 단순하게 정리하는 거지. 짐이 가벼워질수록 마음은 흐트러짐 없이 곧바로 궁극의 해탈과 깨달음을 향해 힘차게 도약할 수 있는 최고의 추진력을 얻게 돼.</text:span><text:span/></text:p>
      <text:p text:style-name="P428"><text:span text:style-name="T1059">📝 핵심 요약</text:span><text:span/></text:p>
      <text:list text:style-name="WWNum22" text:continue-numbering="true">
        <text:list-item>
          <text:p text:style-name="P429"><text:span text:style-name="T1060">여래께서는 중생의 근기에 맞추어 일곱 가지 종류의 별해탈계를 설하셨음.</text:span><text:span/></text:p>
        </text:list-item>
        <text:list-item>
          <text:p text:style-name="P430"><text:span text:style-name="T1061">일곱 가지 계율 가운데 내면을 완벽하게 청정하게 유지하는 범행이 가장 으뜸임.</text:span><text:span/></text:p>
        </text:list-item>
        <text:list-item>
          <text:p text:style-name="P431"><text:span text:style-name="T1062">이 범행의 구체적인 실체는 출가 수행자가 지키는 엄격하고 촘촘한 비구계임.</text:span><text:span/></text:p>
        </text:list-item>
        <text:list-item>
          <text:p text:style-name="P432"><text:span text:style-name="T1063">비구계는 세속의 집착을 덜어내고 해탈로 곧장 날아오르게 돕는 강력한 도약대임.</text:span><text:span/></text:p>
        </text:list-item>
      </text:list>
      <text:p text:style-name="P433"><text:span><text:soft-page-break/></text:span><text:span/><text:span/></text:p>
      <text:p text:style-name="P434"><text:span text:style-name="T1064">[🟢 Online Mode | 26.06.08_14:04:19]</text:span><text:span/></text:p>
      <text:p text:style-name="P435"><text:span text:style-name="T1065">22. 보살계의 수지와 참된 스승의 가이드라인</text:span><text:span/></text:p>
      <text:p text:style-name="P436"><text:span text:style-name="T1066">🔑 핵심 키워드: 보살지, 계품, 보살계 수지, 덕상을 갖춘 스승, 의궤</text:span><text:span/></text:p>
      <text:p text:style-name="P437"><text:span text:style-name="T1067">📜 무착 보살이 남긴 완벽한 안내서</text:span><text:span/></text:p>
      <text:p text:style-name="P438"><text:span text:style-name="T1068">위대한 영적 여정을 떠날 때 가장 먼저 필요한 것은 검증된 지도와 안전 수칙이야. 무착 보살이 저술한 보살지의 계품에 담긴 의궤는 바로 보살이라는 위대한 삶을 살아가기 위한 가장 정확하고 정교한 내비게이션 매뉴얼과 같지. 대충 짐작으로 길을 찾아가는 것이 아니라, 오랜 세월 성자들이 걸어가며 검증한 완벽한 레시피를 그대로 따르는 것이기에 우리는 한 치의 오차도 없이 안전하게 자비의 길을 걸어갈 수 있게 돼.</text:span><text:span/></text:p>
      <text:p text:style-name="P439"><text:span text:style-name="T1069">🏔️ 험난한 산길을 인도할 최고의 가이드</text:span><text:span/></text:p>
      <text:p text:style-name="P440"><text:span text:style-name="T1070">아무리 좋은 지도가 있어도 에베레스트 같은 높은 산을 혼자 오르는 것은 너무나 위험한 일이야. 그래서 지형을 완벽하게 숙지하고 온갖 위기 상황을 겪어낸 베테랑 산악 가이드 같은 존재가 필요한데, 불법의 세계에서는 올바른 덕상을 지닌 참된 스승이 바로 그 역할을 해주시지. 겉모습만 화려한 사람이 아니라 지혜와 자비, 그리고 청정한 계율을 몸소 실천하는 진짜 전문가 스승을 만나야만 비로소 영적인 함정에 빠지지 않고 올바른 가르침을 이어받을 수 있어.</text:span><text:span/></text:p>
      <text:p text:style-name="P441"><text:span text:style-name="T1071">✍️ 우주와 체결하는 가장 고결한 약속</text:span><text:span/></text:p>
      <text:p text:style-name="P442"><text:span text:style-name="T1072">덕상을 갖춘 스승 앞에서 보살계를 받는 일은, 온 우주의 모든 생명체를 고통에서 구하겠다는 위대하고 고결한 약속의 계약서에 서명하는 순간과 같아. 단순한 규칙의 얽매임이 아니라 내 영혼의 신분을 평범한 유정에서 부처님의 가문을 이어받을 당당한 보살로 수직 상승시키는 선포식이지. 스승의 청정한 에너지를 거쳐 전해지는 이 계율의 힘은 내 마음속에 단단한 중심축이 되어, 거친 세상의 유혹 속에서도 흔들리지 않도록 나를 붙잡아주는 든든한 방어벽이 되어준단다.</text:span><text:span/></text:p>
      <text:p text:style-name="P443"><text:span text:style-name="T1073">🌱 수많은 생명에게 그늘을 내어줄 씨앗</text:span><text:span/></text:p>
      <text:p text:style-name="P444"><text:span text:style-name="T1074">이렇게 바른 의궤와 참된 스승을 통해 내면에 심겨진 보살계의 씨앗은, 훗날 수많은 지친 나그네들이 쉬어갈 수 있는 거대한 아름드리나무로 자라나게 돼. 나 혼자만의 안락을 구하던 좁은 마음의 감옥에서 벗어나, 모든 생명을 품어 안는 드넓은 자비의 바다로 나아가는 위대한 첫걸음이지. 이 고결한 다짐을 시작으로 우리의 일상적인 모든 행동은 평범한 몸짓을 넘어, 온 세상을 따뜻하게 치유하는 신성한 보살의 활동으로 완벽하게 탈바꿈하게 되는 거야.</text:span><text:span/></text:p>
      <text:p text:style-name="P445"><text:span text:style-name="T1075">📝 핵심 요약</text:span><text:span/></text:p>
      <text:list text:style-name="WWNum23" text:continue-numbering="true">
        <text:list-item>
          <text:p text:style-name="P446"><text:span text:style-name="T1076">보살지 계품의 의궤는 보살의 삶을 살아가기 위해 성자들이 검증한 완벽한 안내서이다.</text:span><text:span/></text:p>
        </text:list-item>
        <text:list-item>
          <text:p text:style-name="P447"><text:span text:style-name="T1077">영적 여정의 위험을 피하기 위해서는 올바른 덕상과 자격을 갖춘 참된 스승을 만나야 한다.</text:span><text:span/></text:p>
        </text:list-item>
        <text:list-item>
          <text:p text:style-name="P448"><text:span text:style-name="T1078">참된 스승으로부터 계율을 받는 것은 모든 생명을 구하겠다는 고결한 약속이자 선포이다.</text:span><text:span/></text:p>
        </text:list-item>
        <text:list-item>
          <text:p text:style-name="P449"><text:span text:style-name="T1079">보살계를 수지함으로써 이기적인 마음을 넘어 모든 존재를 품는 자비의 여정이 시작된다.</text:span><text:span/></text:p>
        </text:list-item>
      </text:list>
      <text:p text:style-name="P450"><text:span><text:soft-page-break/></text:span><text:span/><text:span/></text:p>
      <text:p text:style-name="P451"><text:span text:style-name="T1080">23. 참된 영적 스승을 구별하는 세 가지 지혜</text:span><text:span/></text:p>
      <text:p text:style-name="P452"><text:span text:style-name="T1081">🔑 핵심 키워드: 전계의식, 계율 수지, 인욕과 자비, 참된 스승</text:span><text:span/></text:p>
      <text:p text:style-name="P453"><text:span text:style-name="T1082">📜 의식과 예법에 통달한 숙련된 능력</text:span><text:span/></text:p>
      <text:p text:style-name="P454"><text:span text:style-name="T1083">참된 스승의 첫 번째 조건은 제자에게 계율을 전해주는 신성한 전계의식의 모든 절차와 의례에 완벽하게 통달해 있어야 한다는 점이야. 이것은 마치 복잡하고 정밀한 수술을 집도하는 베테랑 의사가 한 치의 오차도 없이 수술 프로토콜을 완벽하게 숙지하고 있는 것과 아주 비슷하단다. 의식의 영적인 의미와 올바른 절차를 명확하게 알고 있어야만, 제자들을 혼란에 빠뜨리지 않고 깨달음의 길로 안전하게 이끌어줄 수 있는 전문적인 능력을 발휘할 수 있는 법이지.</text:span><text:span/></text:p>
      <text:p text:style-name="P455"><text:span text:style-name="T1084">🛡️ 자신이 세운 규칙을 몸소 실천하는 언행일치</text:span><text:span/></text:p>
      <text:p text:style-name="P456"><text:span text:style-name="T1085">두 번째 조건은 스승 자신이 전해주는 그 계율을 삶의 중심에 두고 스스로 엄격하게 지키며 안주해야 한다는 사실이야. 아무리 말로 멋진 가르침을 늘어놓아도 스스로의 행동이 따르지 않는다면 결코 깊은 신뢰를 얻을 수 없거든. 자녀에게 스마트폰을 멀리하라고 타이르면서 정작 자신은 하루 종일 화면만 들여다보는 부모의 말에는 힘이 실리지 않는 것과 똑같은 이치야. 스스로 규칙을 몸소 실천하며 살아가는 언행일치의 삶 자체가 제자들에게는 그 어떤 말보다 강력한 가르침</text:span><text:span text:style-name="T1086">이 된단다.</text:span><text:span/></text:p>
      <text:p text:style-name="P457"><text:span text:style-name="T1087">💗 허물을 감싸 안는 따뜻한 인욕과 자비</text:span><text:span/></text:p>
      <text:p text:style-name="P458"><text:span text:style-name="T1088">마지막 세 번째 조건은 가르침을 베풀고 계율을 전할 때 제자의 부족함을 참아내는 인욕과 조건 없는 자비심을 마음 가득히 지녀야 한다는 점이야. 제자가 지혜가 부족하여 실수를 연발하고 올바른 길을 찾지 못해 헤맬 때도, 결코 화를 내거나 쉽게 포기하지 않고 끝까지 품어줄 수 있는 넓은 가슴이 필요하지. 이는 마치 걸음마를 배우는 아기가 수백 번을 넘어지고 주저앉아도 짜증 한 번 내지 않고 늘 따스한 미소로 두 손을 내밀어 주는 부모님의 깊은 사랑과 매우 닮</text:span><text:span text:style-name="T1089">아 있어.</text:span><text:span/></text:p>
      <text:p text:style-name="P459"><text:span text:style-name="T1090">🧭 영혼의 길잡이가 지녀야 할 참된 모습</text:span><text:span/></text:p>
      <text:p text:style-name="P460"><text:span text:style-name="T1091">전계의식에 능통한 전문성, 스스로 계율을 지키는 도덕성, 그리고 제자를 끝까지 책임지는 자비심까지 이 세 가지 조건을 온전히 갖춘 사람이야말로 우리가 안심하고 영혼을 맡길 수 있는 참된 스승이란다. 세상에는 화려한 말솜씨나 외적인 명성으로 스승을 자처하는 이들이 많지만, 우리는 이 세 가지 명확한 기준을 바탕으로 진짜와 가짜를 구별해 낼 수 있는 안목을 길러야 해. 영적 성장의 험난한 여정에서 올바른 길잡이를 만나는 것만큼 중요한 일은 없으니까 말이야.</text:span><text:span/></text:p>
      <text:p text:style-name="P461"><text:span text:style-name="T1092">📝 핵심 요약</text:span><text:span/></text:p>
      <text:list text:style-name="WWNum24" text:continue-numbering="true">
        <text:list-item>
          <text:p text:style-name="P462"><text:span text:style-name="T1093">참된 스승은 전계의식의 모든 절차와 규범에 완벽하게 통달한 전문성을 지녀야 한다.</text:span><text:span/></text:p>
        </text:list-item>
        <text:list-item>
          <text:p text:style-name="P463"><text:span text:style-name="T1094">자신이 가르치고 전하는 계율을 스스로의 삶에서 엄격하게 실천하는 언행일치를 보인다.</text:span><text:span/></text:p>
        </text:list-item>
        <text:list-item>
          <text:p text:style-name="P464"><text:span text:style-name="T1095">제자가 부족하고 실수하더라도 끝까지 품어주는 깊은 인욕과 자비심을 갖추고 있다.</text:span><text:span/></text:p>
        </text:list-item>
        <text:list-item>
          <text:p text:style-name="P465"><text:span text:style-name="T1096">화려한 명성보다 전문성, 도덕성, 자비심이라는 세 가지 기준으로 참된 길잡이를 구별해야 한다.</text:span><text:span/></text:p>
        </text:list-item>
      </text:list>
      <text:p text:style-name="P466"><text:span><text:soft-page-break/></text:span><text:span/><text:span/></text:p>
      <text:p text:style-name="P467"><text:span text:style-name="T1097">[🟢 Online Mode | 26.06.08_14:04:29]</text:span><text:span/></text:p>
      <text:p text:style-name="P468"><text:span text:style-name="T1098">24. 참된 스승의 부재와 대안적인 보살계 수지 의식</text:span><text:span/></text:p>
      <text:p text:style-name="P469"><text:span text:style-name="T1099">🔑 핵심 키워드: 스승의 부재, 보살계 수지, 여법한 의식, 자서수계, 대안적 방편</text:span><text:span/></text:p>
      <text:p text:style-name="P470"><text:span text:style-name="T1100">🔍 참된 스승을 찾기 위한 간절한 노력</text:span><text:span/></text:p>
      <text:p text:style-name="P471"><text:span text:style-name="T1101">보살계라는 위대한 서원을 세우고 이를 삶에 고착시키기 위해서는 먼저 자격을 갖춘 훌륭한 스승을 만나는 것이 정석이야. 마치 높은 산을 안전하게 오르기 위해 지형을 완벽하게 숙지하고 있는 최고의 베테랑 가이드를 찾는 것과 같지. 온 힘을 다해 그런 참된 이정표가 되어줄 스승을 구하는 과정 자체가 우리의 영적인 역량을 단단하게 다지는 중요한 훈련이 된단다.</text:span><text:span/></text:p>
      <text:p text:style-name="P472"><text:span text:style-name="T1102">🏔️ 스승을 만나지 못하는 현실적인 한계</text:span><text:span/></text:p>
      <text:p text:style-name="P473"><text:span text:style-name="T1103">하지만 아무리 간절하게 노력하더라도 시공간의 제약이나 여러 인연 때문에 내면의 성장을 이끌어줄 완벽한 스승을 현실에서 만나지 못할 수도 있어. 최고의 요리 비법을 배우고 싶은데 주변에 마땅한 대가가 없어서 발을 동동 구르는 상황과 비슷하지. 밀교와 대승의 길에서는 이러한 스승의 부재를 단순한 절망이 아니라, 스스로 내면의 등불을 켜고 홀로 서야 하는 새로운 전환점으로 바라본단다.</text:span><text:span/></text:p>
      <text:p text:style-name="P474"><text:span text:style-name="T1104">🕯️ 홀로 서기를 위한 여법한 대안 의식</text:span><text:span/></text:p>
      <text:p text:style-name="P475"><text:span text:style-name="T1105">스승이 없다고 해서 위대한 보살의 길을 포기할 필요는 전혀 없어. 아티샤 스승은 참된 스승을 얻지 못했을 때도 혼자서 올바르게 서원을 세우고 계율을 수지할 수 있는 또 다른 완벽한 의식을 알려주겠다고 선언해. 곁에 선생님이 없더라도 완벽하게 정제된 표준 독학 교재나 온라인 가이드를 보고 스스로 올바른 규칙을 세워 공부를 이어 나가는 합리적인 대안을 제시하는 셈이지.</text:span><text:span/></text:p>
      <text:p text:style-name="P476"><text:span text:style-name="T1106">🏛️ 부처님 앞에서 세우는 신성한 서약</text:span><text:span/></text:p>
      <text:p text:style-name="P477"><text:span text:style-name="T1107">이 대안적인 방법은 비록 인간 스승은 눈앞에 없을지라도, 시공간을 초월해 계시는 모든 부처님과 보살님들을 증인으로 모시고 엄숙하게 서약을 맺는 자서수계의 방식이야. 법정에 판사가 없더라도 국가의 헌법과 역사적인 성상 앞에서 엄숙하게 선서를 하며 정의를 다짐하는 것처럼 고결한 의식이지. 이를 통해 우리는 어떤 상황에서도 꺾이지 않고 깨달음의 길을 향해 당당하게 걸어갈 수 있는 강력한 영적 무기를 얻게 돼.</text:span><text:span/></text:p>
      <text:p text:style-name="P478"><text:span text:style-name="T1108">📝 핵심 요약</text:span><text:span/></text:p>
      <text:list text:style-name="WWNum25" text:continue-numbering="true">
        <text:list-item>
          <text:p text:style-name="P479"><text:span text:style-name="T1109">보살계를 받기 위해서는 자격을 갖춘 참된 스승을 찾으려는 진지하고 간절한 노력이 우선되어야 해.</text:span><text:span/></text:p>
        </text:list-item>
        <text:list-item>
          <text:p text:style-name="P480"><text:span text:style-name="T1110">시공간의 한계로 끝내 올바른 스승을 만나지 못하더라도 절망하거나 깨달음의 길을 포기할 필요는 없어.</text:span><text:span/></text:p>
        </text:list-item>
        <text:list-item>
          <text:p text:style-name="P481"><text:span text:style-name="T1111">스승이 없을 때를 대비해 혼자서도 여법하게 계율을 수지할 수 있는 신성하고 대안적인 의식 절차가 존재해.</text:span><text:span/></text:p>
        </text:list-item>
        <text:list-item>
          <text:p text:style-name="P482"><text:span text:style-name="T1112">모든 부처님과 보살님을 증인으로 모시고 서원을 세우는 이 의식을 통해 스승이 없는 상황에서도 당당히 보살의 길로 나아갈 수 있어.</text:span><text:span/></text:p>
        </text:list-item>
      </text:list>
      <text:p text:style-name="P483"><text:span><text:soft-page-break/></text:span><text:span/><text:span/></text:p>
      <text:p text:style-name="P484"><text:span text:style-name="T1113">[🟢 Online Mode | 26.06.08_14:04:35]</text:span><text:span/></text:p>
      <text:p text:style-name="P485"><text:span text:style-name="T1114">25. 문수보살의 원초적 보리심과 전승의 기록</text:span><text:span/></text:p>
      <text:p text:style-name="P486"><text:span text:style-name="T1115">🔑 핵심 키워드: 문수보살, 허공왕, 보리심, 문수불토장엄경, 기록</text:span><text:span/></text:p>
      <text:p text:style-name="P487"><text:span text:style-name="T1116">👑 무량겁 과거 속 허공왕의 위대한 시작</text:span><text:span/></text:p>
      <text:p text:style-name="P488"><text:span text:style-name="T1117">지혜를 상징하는 문수보살에게도 아주 까마득한 과거 시절이 있었어. 셀 수도 없을 만큼 오랜 시간 전인 무량겁 과거에 문수보살은 허공왕이라는 이름의 위대한 왕으로 세상에 존재했었지. 이것은 지금 우리가 보고 있는 거대한 낙엽송이 수천 년 전에 아주 작은 한 알의 씨앗에서 출발했던 것과 같아. 아무리 위대하고 눈부신 지혜를 가진 존재라도 처음 위대한 뜻을 품었던 원초적인 출발점이 존재한다는 것을 보여주는 대목이란다.</text:span><text:span/></text:p>
      <text:p text:style-name="P489"><text:span text:style-name="T1118">💡 온 우주를 품은 보리심의 첫 발걸음</text:span><text:span/></text:p>
      <text:p text:style-name="P490"><text:span text:style-name="T1119">허공왕 시절에 문수보살이 품었던 가장 핵심적인 마음은 바로 모든 생명을 구하겠다는 위대한 보리심이었어. 왕이라는 높은 지위와 권력을 단순히 자신의 안락을 위해 쓰지 않고 온 세상 유정들을 깨달음으로 인도하겠다는 거대한 마스터플랜을 세운 거지. 스마트폰의 운영체제를 설계할 때 전 세계 모든 사용자가 버그 없이 안전하게 쓸 수 있도록 완벽한 마스터 키를 코딩하는 개발자의 마음을 상상하면 이해하기 쉬울 거야.</text:span><text:span/></text:p>
      <text:p text:style-name="P491"><text:span text:style-name="T1120">📜 문수불토장엄경이라는 신뢰할 수 있는 설계도</text:span><text:span/></text:p>
      <text:p text:style-name="P492"><text:span text:style-name="T1121">이 경이롭고 위대한 보리심의 기록은 아무렇게나 지어낸 이야기가 아니라 문수불토장엄경이라는 유서 깊은 경전에 고스란히 담겨 있어. 대대로 내려오는 최고의 맛집 비법이 적힌 비밀 레시피 북이나 국가의 보물이 숨겨진 정밀한 고지도처럼 아주 귀중하고 확실한 증거 자료이지. 스승들은 이 신성한 텍스트에 기록된 내용을 바탕으로 문수보살이 걸어갔던 깨달음의 발자취를 한 치의 오차도 없이 우리에게 전달해 주려고 해.</text:span><text:span/></text:p>
      <text:p text:style-name="P493"><text:span text:style-name="T1122">✍️ 진리의 등불을 명확하게 밝히는 기록의 가치</text:span><text:span/></text:p>
      <text:p text:style-name="P494"><text:span text:style-name="T1123">게송의 마지막 부분에서는 경전에 기록된 허공왕의 보리심 이야기를 이제 이곳에 아주 자세하고 명확하게 적어 내려가겠다고 선언하고 있어. 귀한 보물을 상자 속에 깊이 감추어 두는 것이 아니라 누구나 쉽게 읽고 따라갈 수 있도록 친절한 안내서로 펴내는 작업과 같지. 앞서간 위대한 성자의 발자취를 글로 선명하게 남겨둠으로써 어두운 밤길을 걷는 우리 같은 중생들에게 아주 밝고 든든한 이정표를 세워주는 뜻깊은 과정이란다.</text:span><text:span/></text:p>
      <text:p text:style-name="P495"><text:span text:style-name="T1124">📝 핵심 요약</text:span><text:span/></text:p>
      <text:list text:style-name="WWNum26" text:continue-numbering="true">
        <text:list-item>
          <text:p text:style-name="P496"><text:span text:style-name="T1125">문수보살은 아주 까마득한 과거인 무량겁 전에 허공왕이라는 왕으로 존재했다.</text:span><text:span/></text:p>
        </text:list-item>
        <text:list-item>
          <text:p text:style-name="P497"><text:span text:style-name="T1126">허공왕 시절에 모든 생명을 구하겠다는 거대한 보리심을 처음으로 일으켰다.</text:span><text:span/></text:p>
        </text:list-item>
        <text:list-item>
          <text:p text:style-name="P498"><text:span text:style-name="T1127">이 위대한 깨달음의 시작은 문수불토장엄경이라는 신뢰할 수 있는 경전에 기록되어 있다.</text:span><text:span/></text:p>
        </text:list-item>
        <text:list-item>
          <text:p text:style-name="P499"><text:span text:style-name="T1128">경전의 귀중한 가르침을 바탕으로 그 보리심의 과정을 이곳에 명확하고 자세하게 기록하여 후대에 전한다.</text:span><text:span/></text:p>
        </text:list-item>
      </text:list>
      <text:p text:style-name="P500"><text:span><text:soft-page-break/></text:span><text:span/><text:span/></text:p>
      <text:p text:style-name="P501"><text:span text:style-name="T1129">[🟢 Online Mode | 26.06.08_14:04:41]</text:span><text:span/></text:p>
      <text:p text:style-name="P502"><text:span text:style-name="T1130">26. 👑 세간의 구호자들 앞에서 선언하는 위대한 발심</text:span><text:span/></text:p>
      <text:p text:style-name="P503"><text:span text:style-name="T1131">🔑 핵심 키워드: 대보리 발심, 세간의 구호자, 귀빈의 초대, 윤회 해탈</text:span><text:span/></text:p>
      <text:p text:style-name="P504"><text:span text:style-name="T1132">세간의 구호자들인 수많은 부처님과 보살님들이 지켜보는 엄숙한 면전에서, 마침내 최고의 깨달음을 얻겠다는 위대한 결심인 발심을 선언하는 장면이야. 이는 마치 온 우주의 지혜로운 스승들을 보증인으로 모셔두고, 내 인생의 방향을 완전히 바꾸겠다는 가장 신성한 계약서에 서명을 하는 것과 같아. 나 혼자 잘 먹고 잘 살겠다는 작은 다짐이 아니라, 우주에서 가장 높은 경지에 도달하겠다는 영혼의 거대한 선포인 셈이지.</text:span><text:span/></text:p>
      <text:p text:style-name="P505"><text:span text:style-name="T1133">최고의 깨달음인 대보리를 향한 이 다짐은 우리 마음의 메인 운영체제를 완전히 업그레이드하는 강력한 리셋 버튼이야. 평소에 우리가 하던 자질구레한 걱정이나 이기적인 욕심의 회로를 단숨에 차단하고, 가장 넓고 깊은 우주적 지혜의 네비게이션을 켜는 일이지. 이 거대한 발심이 우리 내면에서 단단하게 자리 잡을 때, 삶을 바라보는 시야는 무한하게 확장되기 시작해.</text:span><text:span/></text:p>
      <text:p text:style-name="P506"><text:span text:style-name="T1134">여기서 한 걸음 더 나아가 고통받는 세상의 모든 생명들을 내 삶의 가장 소중한 귀빈으로 정중하게 초대하겠다는 놀라운 다짐을 해. 마치 세상에서 가장 풍요롭고 아늑한 대만찬을 준비해 두고, 길거리에서 추위에 떨고 있는 모든 나그네들을 최고의 귀빈으로 모시는 아량과 닮아 있어. 그 어떤 조건이나 차별도 없이 모든 중생을 진심으로 존중하고 섬기겠다는 이 위대한 초대는 우리를 우주의 진정한 주인공으로 만드는 강력한 에너지가 되지.</text:span><text:span/></text:p>
      <text:p text:style-name="P507"><text:span text:style-name="T1135">이 초대의 궁극적인 목적은 단순히 그들에게 물질적인 도움을 주는 수준을 넘어, 끝없이 반복되는 괴로움의 바다인 윤회에서 그들을 완전히 건져내겠다는 서원이야. 거센 폭풍우가 몰아쳐서 가라앉고 있는 난파선에서 구명보트를 몰고 가 모든 사람을 한 명도 빠짐없이 구조해 내는 영웅적인 행동과 똑같아. 모든 중생을 고통의 감옥에서 해방시키겠다는 이 장엄한 약속을 실천할 때, 우리는 비로소 진정한 부처의 길로 당당하게 걸어가게 되는 거야.</text:span><text:span/></text:p>
      <text:p text:style-name="P508"><text:span text:style-name="T1136">📝 핵심 요약</text:span><text:span/></text:p>
      <text:list text:style-name="WWNum27" text:continue-numbering="true">
        <text:list-item>
          <text:p text:style-name="P509"><text:span text:style-name="T1137">부처님과 보살님들의 면전에서 최고의 깨달음을 얻겠다는 거대한 서원을 세운다.</text:span><text:span/></text:p>
        </text:list-item>
        <text:list-item>
          <text:p text:style-name="P510"><text:span text:style-name="T1138">개인의 해탈을 넘어 우주적 지혜를 깨우는 대보리의 마음으로 의식의 운영체제를 리셋한다.</text:span><text:span/></text:p>
        </text:list-item>
        <text:list-item>
          <text:p text:style-name="P511"><text:span text:style-name="T1139">고통받는 모든 중생을 차별 없이 자신의 가장 고귀한 귀빈으로 정중히 초대한다.</text:span><text:span/></text:p>
        </text:list-item>
        <text:list-item>
          <text:p text:style-name="P512"><text:span text:style-name="T1140">번뇌와 괴로움이 반복되는 윤회의 바다에서 모든 존재를 완벽하게 구제하겠다고 다짐한다.</text:span><text:span/></text:p>
        </text:list-item>
      </text:list>
      <text:p text:style-name="P513"><text:span><text:soft-page-break/></text:span><text:span/><text:span/></text:p>
      <text:p text:style-name="P514"><text:span text:style-name="T1141">[🟢 Online Mode | 26.06.08_14:04:51]</text:span><text:span/></text:p>
      <text:p text:style-name="P515"><text:span text:style-name="T1142">27. 네 가지 마음의 독소를 비우는 청정 서원</text:span><text:span/></text:p>
      <text:p text:style-name="P516"><text:span text:style-name="T1143">🔑 핵심 키워드: 해치는 마음, 성냄, 인색함, 질투, 대보리의 서원</text:span><text:span/></text:p>
      <text:p text:style-name="P517"><text:span text:style-name="T1144">🌪️ 내면을 파괴하는 네 가지 감정의 독소</text:span><text:span/></text:p>
      <text:p text:style-name="P518"><text:span text:style-name="T1145">해치는 마음, 성내는 마음, 인색함, 질투하는 마음은 우리의 정신을 오염시키는 치명적인 독소야. 이 감정들은 마치 맑은 우물물에 정기적으로 오염 물질을 떨어뜨리는 것과 같아서, 결국 나 자신뿐만 아니라 주변 사람들의 마음까지도 까맣게 황폐하게 만들어버리지. 깨달음의 길로 나아가기 위해서는 내면을 어지럽히는 이 네 가지 부정적인 잡초들을 눈앞에서 완전히 뿌리째 뽑아내겠다는 단호한 자각이 선행되어야 해.</text:span><text:span/></text:p>
      <text:p text:style-name="P519"><text:span text:style-name="T1146">🛡️ 대보리를 향한 단단한 영적 방어벽</text:span><text:span/></text:p>
      <text:p text:style-name="P520"><text:span text:style-name="T1147">수행자는 지금 이 순간부터 궁극의 깨달음인 대보리를 얻을 때까지 이러한 악한 감정들을 결코 행하지 않겠다고 굳게 다짐해. 이것은 마치 컴퓨터에 실시간 악성코드 차단 프로그램을 설치하여, 외부에서 위험한 바이러스나 해킹 공격이 들어오려 할 때마다 시스템이 스스로 차단벽을 치고 내부를 안전하게 보호하는 것과 똑같은 이치야. 영원한 자유를 얻는 그날까지 마음의 보안 시스템을 철저하게 가동하겠다는 성스러운 약속이지.</text:span><text:span/></text:p>
      <text:p text:style-name="P521"><text:span text:style-name="T1148">🧘 감정의 노예에서 마음의 주인으로</text:span><text:span/></text:p>
      <text:p text:style-name="P522"><text:span text:style-name="T1149">부정적인 감정이 일어날 때 그것에 휩쓸리지 않고 결코 행하지 않겠다고 선언하는 것은 마음의 주도권을 내가 쥐겠다는 강력한 의지야. 평소에는 분노나 질투가 밀려오면 브레이크가 고장 난 자동차처럼 감정이 이끄는 대로 폭주하기 쉽잖아. 하지만 이 서원을 세움으로써 감정은 내가 잠시 경험하는 날씨일 뿐, 내 존재 자체의 본질이 아님을 깨닫고 고요하게 흘려보낼 수 있는 단단한 내면의 힘을 기르게 되는 법이야.</text:span><text:span/></text:p>
      <text:p text:style-name="P523"><text:span text:style-name="T1150">🌊 무한한 자비로 채우는 비움의 미학</text:span><text:span/></text:p>
      <text:p text:style-name="P524"><text:span text:style-name="T1151">네 가지 독소를 비워낸 자리에는 자연스럽게 모든 중생을 향한 무한한 자비심과 사랑이 채워지게 돼. 비좁고 지저분한 창고를 깨끗하게 비워내야만 비로소 귀하고 아름다운 보물들을 가득 채워 넣을 수 있는 것처럼 말이지. 나를 해치려는 부정적인 에너지를 멈추는 순간, 내 마음은 온 우주를 품을 수 있을 만큼 넓어지며 마침내 부처님의 성품에 한 걸음 더 가까이 다가서게 되는 거란다.</text:span><text:span/></text:p>
      <text:p text:style-name="P525"><text:span text:style-name="T1152">📝 핵심 요약</text:span><text:span/></text:p>
      <text:list text:style-name="WWNum28" text:continue-numbering="true">
        <text:list-item>
          <text:p text:style-name="P526"><text:span text:style-name="T1153">해침, 성냄, 인색함, 질투는 마음에 치명적인 손상을 입히는 네 가지 독소임.</text:span><text:span/></text:p>
        </text:list-item>
        <text:list-item>
          <text:p text:style-name="P527"><text:span text:style-name="T1154">대보리를 얻을 때까지 이 감정들을 행하지 않겠다는 것은 영적인 보안 프로그램을 가동하는 것과 같음.</text:span><text:span/></text:p>
        </text:list-item>
        <text:list-item>
          <text:p text:style-name="P528"><text:span text:style-name="T1155">감정에 휩쓸리지 않는 서원을 통해 브레이크 고장 난 자동차처럼 폭주하지 않고 마음의 주인이 됨.</text:span><text:span/></text:p>
        </text:list-item>
        <text:list-item>
          <text:p text:style-name="P529"><text:span text:style-name="T1156">내면의 부정적인 감정을 깨끗이 비워내야 온 우주를 품을 수 있는 자비심을 채울 수 있음.</text:span><text:span/></text:p>
        </text:list-item>
      </text:list>
      <text:p text:style-name="P530"><text:span><text:soft-page-break/></text:span><text:span/><text:span/></text:p>
      <text:p text:style-name="P531"><text:span text:style-name="T1157">28. 청정한 삶의 선택과 부처님을 따르는 위대한 서원</text:span><text:span/></text:p>
      <text:p text:style-name="P532"><text:span text:style-name="T1158">🔑 핵심 키워드: 범행, 탐욕 차단, 율의계, 부처님 동행</text:span><text:span/></text:p>
      <text:p text:style-name="P533"><text:span text:style-name="T1159">🕊️ 청정한 삶, 범행의 위대한 시작</text:span><text:span/></text:p>
      <text:p text:style-name="P534"><text:span text:style-name="T1160">깨달음의 길로 나아가기 위해 가장 먼저 해야 할 일은 범행, 즉 맑고 깨끗한 삶을 지켜나가는 거야. 우리 마음은 평소에 온갖 자극과 유혹에 노출되어 있어서 쉽게 오염되곤 하잖아? 범행을 실천한다는 것은 마치 먼지가 가득한 방안을 깨끗하게 청소하고 창문을 활짝 열어 신선한 공기를 가득 채우는 것과 같아. 일상의 사소한 행동 하나하나를 맑게 유지할 때 비로소 우리 내면의 거울이 투명하게 빛나기 시작하지.</text:span><text:span/></text:p>
      <text:p text:style-name="P535"><text:span text:style-name="T1161">🛑 죄악과 탐욕의 사슬 끊어내기</text:span><text:span/></text:p>
      <text:p text:style-name="P536"><text:span text:style-name="T1162">그다음으로 중요한 태도는 우리를 불행으로 이끄는 죄악과 이기적인 탐욕을 과감하게 버리는 일이야. 끝없는 욕심은 채워도 채워도 끝이 나지 않고 결국 우리 영혼을 갉아먹는 독과 같거든. 마치 끝이 보이지 않는 깊은 늪지대로 걸어 들어가는 발걸음을 멈추고, 과감하게 안전하고 단단한 땅 위로 올라오는 결단이 필요해. 눈앞의 작은 이익이나 유혹에 흔들리지 않고 무거운 욕망의 짐을 내려놓을 때 비로소 마음은 무한한 자유를 얻게 돼.</text:span><text:span/></text:p>
      <text:p text:style-name="P537"><text:span text:style-name="T1163">🛡️ 율의계를 기쁘게 받아들이는 마음</text:span><text:span/></text:p>
      <text:p text:style-name="P538"><text:span text:style-name="T1164">부처님이 제시해 준 규칙과 도덕적 지침인 율의계를 억지로 지키는 무거운 짐이 아니라 나를 지켜주는 울타리로 여기며 기쁘게 받아들여야 해. 많은 사람들은 계율이라고 하면 나를 구속하고 답답하게 만드는 감옥처럼 생각하곤 하지. 하지만 이건 험난한 절벽 길을 안전하게 달릴 수 있도록 튼튼하게 설치된 가드레일과 같은 존재야. 가드레일이 있어서 운전자가 안심하고 속도를 낼 수 있듯이, 율의계를 기쁜 마음으로 따를 때 우리 삶은 어떤 위험 속에서도 안전하게 보호받을</text:span><text:span text:style-name="T1165"> 수 있어.</text:span><text:span/></text:p>
      <text:p text:style-name="P539"><text:span text:style-name="T1166">跑 부처님의 발자취를 따라가는 동행</text:span><text:span/></text:p>
      <text:p text:style-name="P540"><text:span text:style-name="T1167">마지막으로 이 모든 실천의 종착지는 앞서 걸어가신 부처님의 지혜와 자비를 그대로 닮아가는 거야. 혼자서 거친 사막을 헤매는 대신, 이미 길을 완벽하게 알고 있는 훌륭한 길잡이의 뒤를 바짝 따라가는 현명함이 필요하지. 부처님이 보여주신 삶의 방식을 매일 거울삼아 나를 다듬어 가다 보면, 어느새 내 안에서도 부처님과 똑같은 눈부신 지혜의 빛이 피어나게 될 거야. 위대한 스승의 발자취를 온전히 따르겠다는 서원이야말로 우리를 궁극의 성불로 인도하는 가장 빠른 지</text:span><text:span text:style-name="T1168">름길이란다.</text:span><text:span/></text:p>
      <text:p text:style-name="P541"><text:span text:style-name="T1169">📝 핵심 요약</text:span><text:span/></text:p>
      <text:list text:style-name="WWNum29" text:continue-numbering="true">
        <text:list-item>
          <text:p text:style-name="P542"><text:span text:style-name="T1170">범행을 통해 일상의 행동을 맑고 깨끗하게 유지하여 지혜의 그릇을 준비함</text:span><text:span/></text:p>
        </text:list-item>
        <text:list-item>
          <text:p text:style-name="P543"><text:span text:style-name="T1171">영혼을 해치는 죄악과 끝없는 탐욕의 늪에서 과감하게 벗어나는 결단력을 기름</text:span><text:span/></text:p>
        </text:list-item>
        <text:list-item>
          <text:p text:style-name="P544"><text:span text:style-name="T1172">율의계를 삶을 지켜주는 안전한 가드레일로 여겨 기쁜 마음으로 수용함</text:span><text:span/></text:p>
        </text:list-item>
        <text:list-item>
          <text:p text:style-name="P545"><text:span text:style-name="T1173">앞서 걸어가신 부처님의 자비와 지혜를 거울삼아 온전하게 닮아감</text:span><text:span/></text:p>
        </text:list-item>
      </text:list>
      <text:p text:style-name="P546"><text:span><text:soft-page-break/></text:span><text:span/><text:span/></text:p>
      <text:p text:style-name="P547"><text:span text:style-name="T1174">[🟢 Online Mode | 26.06.08_14:05:07]</text:span><text:span/></text:p>
      <text:p text:style-name="P548"><text:span text:style-name="T1175">29. 신속한 성불을 미루는 무한한 자비의 서원</text:span><text:span/></text:p>
      <text:p text:style-name="P549"><text:span text:style-name="T1176">🔑 핵심 키워드: 신속한 보리 거부, 한 유정의 이익, 미래의 마지막, 무한한 자비</text:span><text:span/></text:p>
      <text:p text:style-name="P550"><text:span text:style-name="T1177">⏳ 지름길을 마다하는 영혼의 위대한 결단</text:span><text:span/></text:p>
      <text:p text:style-name="P551"><text:span text:style-name="T1178">신속하게 깨달음을 얻어 고통 없는 세계로 홀로 가기를 거부하는 대승적 보살의 깊은 마음이야. 비유하자면, 혼자서 가장 빠르고 편안한 일등석 기차를 타고 목적지에 도달할 수 있음에도 불구하고, 뒤처진 사람들을 위해 기차에서 스스로 내려 험난한 길을 함께 걸어가기로 결단하는 다정한 안내자의 마음과 같지. 나만의 안락과 해탈을 뒤로 미루는 숭고한 용기야.</text:span><text:span/></text:p>
      <text:p text:style-name="P552"><text:span text:style-name="T1179">🎯 단 한 사람을 위한 우주적 가치</text:span><text:span/></text:p>
      <text:p text:style-name="P553"><text:span text:style-name="T1180">이 서원은 거창한 대중만을 향한 게 아니라, 고통받는 단 한 존재의 이익을 위해서라면 기꺼이 자신을 던지겠다는 무한한 사랑에 기반해 있어.</text:span><text:span/></text:p>
      <text:list text:style-name="WWNum30" text:continue-numbering="true">
        <text:list-item>
          <text:p text:style-name="P554"><text:span text:style-name="T1181">대상: 세상에서 가장 소외되고 외로운 단 한 명의 유정</text:span><text:span/></text:p>
        </text:list-item>
        <text:list-item>
          <text:p text:style-name="P555"><text:span text:style-name="T1182">행동: 그 존재가 고통의 늪에서 완전히 벗어날 수 있도록 돕는 일</text:span><text:span/></text:p>
        </text:list-item>
        <text:list-item>
          <text:p text:style-name="P556"><text:span text:style-name="T1183">비유: 거대한 숲에 불이 났을 때 모든 동물이 도망치더라도, 둥지에 남겨진 작은 아기 새 한 마리를 구하기 위해 불길 속으로 다시 뛰어드는 어미 새의 헌신과 똑같아. 단 하나를 천하보다 무겁게 여기는 마음에 신선한 자극을 받게 되지.</text:span><text:span/></text:p>
        </text:list-item>
      </text:list>
      <text:p text:style-name="P557"><text:span text:style-name="T1184">♾️ 시간의 끝을 지키는 영원한 파수꾼</text:span><text:span/></text:p>
      <text:p text:style-name="P558"><text:span text:style-name="T1185">보살은 미래의 마지막 순간, 즉 우주의 모든 타임라인이 끝나는 종말의 그날까지 윤회계에 기꺼이 머물겠다고 다짐해.</text:span><text:span/></text:p>
      <table:table table:style-name="ta4">
        <table:table-columns>
          <table:table-column table:style-name="co9"/>
          <table:table-column table:style-name="co10"/>
          <table:table-column table:style-name="co11"/>
        </table:table-columns>
        <table:table-header-rows>
          <table:table-row table:style-name="ro12" table:default-cell-style-name="ce33">
            <table:table-cell table:style-name="ce34">
              <text:p text:style-name="P559"><text:span text:style-name="T1186">차원</text:span><text:span/></text:p>
            </table:table-cell>
            <table:table-cell table:style-name="ce35">
              <text:p text:style-name="P560"><text:span text:style-name="T1187">일반적인 추구</text:span><text:span/></text:p>
            </table:table-cell>
            <table:table-cell table:style-name="ce36">
              <text:p text:style-name="P561"><text:span text:style-name="T1188">보살의 무한한 서원</text:span><text:span/></text:p>
            </table:table-cell>
          </table:table-row>
        </table:table-header-rows>
        <table:table-row table:style-name="ro13" table:default-cell-style-name="ce33">
          <table:table-cell table:style-name="ce37">
            <text:p text:style-name="P562"><text:span text:style-name="T1189">시간적 한계</text:span><text:span/></text:p>
          </table:table-cell>
          <table:table-cell table:style-name="ce38">
            <text:p text:style-name="P563"><text:span text:style-name="T1190">빠른 해탈과 고통의 종결</text:span><text:span/></text:p>
          </table:table-cell>
          <table:table-cell table:style-name="ce39">
            <text:p text:style-name="P564"><text:span text:style-name="T1191">미래의 마지막인 영원까지 연장</text:span><text:span/></text:p>
          </table:table-cell>
        </table:table-row>
        <table:table-row table:style-name="ro14" table:default-cell-style-name="ce33">
          <table:table-cell table:style-name="ce40">
            <text:p text:style-name="P565"><text:span text:style-name="T1192">공간적 머무름</text:span><text:span/></text:p>
          </table:table-cell>
          <table:table-cell table:style-name="ce41">
            <text:p text:style-name="P566"><text:span text:style-name="T1193">청정한 열반의 세계</text:span><text:span/></text:p>
          </table:table-cell>
          <table:table-cell table:style-name="ce42">
            <text:p text:style-name="P567"><text:span text:style-name="T1194">고통과 혼돈이 가득한 윤회의 바다</text:span><text:span/></text:p>
          </table:table-cell>
        </table:table-row>
        <table:table-row table:style-name="ro15" table:default-cell-style-name="ce33">
          <table:table-cell table:style-name="ce43">
            <text:p text:style-name="P568"><text:span text:style-name="T1195">직관적 비유</text:span><text:span/></text:p>
          </table:table-cell>
          <table:table-cell table:style-name="ce44">
            <text:p text:style-name="P569"><text:span text:style-name="T1196">영업이 끝나 퇴근하는 직원</text:span><text:span/></text:p>
          </table:table-cell>
          <table:table-cell table:style-name="ce45">
            <text:p text:style-name="P570"><text:span text:style-name="T1197">마지막 손님이 나갈 때까지 문을 지키는 파수꾼</text:span><text:span/></text:p>
          </table:table-cell>
        </table:table-row>
      </table:table>
      <text:p text:style-name="P571"><text:span text:style-name="T1198">🤝 온 우주를 품는 위대한 이타주의의 완성</text:span><text:span/></text:p>
      <text:p text:style-name="P572"><text:span text:style-name="T1199">"저는 신속한 방편으로써 보리를 얻음을 기뻐 않고, 한 유정의 이익을 행하는 원인으로 미래의 마지막까지 머물겠나이다." 이 짧은 고백 속에는 나라는 벽을 완전히 허물어뜨린 대승의 정수가 흐르고 있어. 내 깨달음보다 타인의 아픔을 먼저 치유하겠다는 역설적인 선택이 오히려 존재를 가장 완벽한 깨달음으로 인도하는 법이지. 칠흑 같은 어둠 속에서 스스로 등불이 되어 우주 전체를 따뜻하게 비추는 영원한 동반자의 도정이야.</text:span><text:span/></text:p>
      <text:p text:style-name="P573"><text:span text:style-name="T1200">📝 핵심 요약</text:span><text:span/></text:p>
      <text:list text:style-name="WWNum30" text:continue-numbering="true">
        <text:list-item>
          <text:p text:style-name="P574"><text:span text:style-name="T1201">자신만의 빠른 성불과 해탈을 기꺼이 거부하고 고통의 바다에 남기를 자처함.</text:span><text:span/></text:p>
        </text:list-item>
        <text:list-item>
          <text:p text:style-name="P575"><text:span text:style-name="T1202">거창한 숫자가 아닌 단 한 명의 소외된 유정을 위해 온 힘을 다해 헌신함.</text:span><text:span/></text:p>
        </text:list-item>
        <text:list-item>
          <text:p text:style-name="P576"><text:span text:style-name="T1203">우주의 시간이 끝나는 미래의 마지막 순간까지 머무는 영원한 파수꾼의 자세를 지님.</text:span><text:span/></text:p>
        </text:list-item>
        <text:list-item>
          <text:p text:style-name="P577"><text:span text:style-name="T1204">타인의 구원을 위해 자신을 뒤로 미루는 선택을 통해 진정한 대승의 이타주의를 완성함.</text:span><text:span/></text:p>
        </text:list-item>
      </text:list>
      <text:p text:style-name="P578"><text:span><text:soft-page-break/></text:span><text:span/><text:span/></text:p>
      <text:p text:style-name="P579"><text:span text:style-name="T1205">30. 원대한 서원과 명호의 울림</text:span><text:span/></text:p>
      <text:p text:style-name="P580"><text:span text:style-name="T1206">🔑 핵심 키워드: 불국토 정화, 사의불가해, 명호, 시방세계, 보살의 서원</text:span><text:span/></text:p>
      <text:p text:style-name="P581"><text:span text:style-name="T1207">🧹 나만의 아름다운 정원을 가꾸는 마음</text:span><text:span/></text:p>
      <text:p text:style-name="P582"><text:span text:style-name="T1208">한량없고 상상조차 할 수 없는 나의 불국토를 온전히 정화하겠다는 서원은, 마치 거친 황무지 같던 땅을 정성껏 일구어 누구나 와서 편히 쉴 수 있는 세상에서 가장 아름다운 정원을 가꾸는 것과 같아. 나 혼자만 편하게 살기 위한 비밀 공간을 만드는 게 아니라, 고통 속에서 헤매는 모든 생명들이 언제든 찾아와 마음의 평화를 누릴 수 있도록 완벽한 영적 쉼터를 완성하겠다는 원대한 다짐이지. 내 마음의 정원을 깨끗이 청소하는 이 자비로운 노력이 결국 온 우주를 맑</text:span><text:span text:style-name="T1209">게 바꾸는 아름다운 첫걸음이 되는 셈이야.</text:span><text:span/></text:p>
      <text:p text:style-name="P583"><text:span text:style-name="T1210">🌌 우리 머리로는 다 담을 수 없는 거대한 우주</text:span><text:span/></text:p>
      <text:p text:style-name="P584"><text:span text:style-name="T1211">'사의(思議)조차 못한다'는 말은 우리의 좁은 생각이나 세속적인 계산으로는 감히 그 크기와 깊이를 짐작할 수조차 없다는 뜻이야. 작은 스마트폰 화면 속에 온 우주의 수많은 은하계를 다 담아낼 수 없는 것처럼, 보살이 품는 원력의 스케일은 우리가 일상적으로 따지는 손익계산을 가볍게 뛰어넘지. 우리가 가진 상상의 한계를 기분 좋게 깨부수고 무한한 가능성의 공간으로 마음을 활짝 열 때, 비로소 상상치도 못했던 위대한 기적과 영적인 도약이 우리 삶 속에서 시작되</text:span><text:span text:style-name="T1212">는 법이란다.</text:span><text:span/></text:p>
      <text:p text:style-name="P585"><text:span text:style-name="T1213">☎️ 언제 어디서나 연결되는 생명의 핫라인</text:span><text:span/></text:p>
      <text:p text:style-name="P586"><text:span text:style-name="T1214">모두가 내 이름을 지니게 하겠다는 서원은 세간의 단순한 명예욕이 아니라, 위급한 순간에 언제든 누를 수 있는 절대적인 구원의 핫라인 번호를 세상 모든 이들에게 공짜로 나누어 주겠다는 자비로운 약속이야. 마치 어두운 밤길을 헤매며 무서워하던 아이가 엄마의 이름을 부르는 바로 그 순간 온전한 보호를 받으며 안도하게 되는 것과 똑같지. 보살의 이름을 마음속에 품고 간절히 부르는 것만으로도 거친 두려움의 파도에서 벗어나 안전하게 보호받을 수 있는 영적인 안전장치</text:span><text:span text:style-name="T1215">를 든든하게 마련해 주는 거야.</text:span><text:span/></text:p>
      <text:p text:style-name="P587"><text:span text:style-name="T1216">📢 온 누리에 울려 퍼지는 자비의 와이파이</text:span><text:span/></text:p>
      <text:p text:style-name="P588"><text:span text:style-name="T1217">그 이름이 시방, 즉 동서남북과 상하를 아우르는 온 우주의 모든 방향에 머물게 하겠다는 것은 자비의 와이파이 신호를 우주 끝까지 강력하게 쏘아 올리겠다는 뜻과 같아. 공간과 시간의 제약을 완전히 뛰어넘어 고통이 존재하는 그 어떤 외딴곳이라도 나의 구원 에너지가 가닿지 않는 곳이 없도록 하겠다는 장엄한 선언이지. 이 넓고 넓은 우주 전체를 나의 따뜻한 자비장 안에 두고, 단 한 사람의 소외되는 생명도 없이 모두를 끝까지 책임지겠다는 위대한 보살의 참모습을 </text:span><text:span text:style-name="T1218">잘 보여주는 대목이야.</text:span><text:span/></text:p>
      <text:p text:style-name="P589"><text:span text:style-name="T1219">📝 핵심 요약</text:span><text:span/></text:p>
      <text:list text:style-name="WWNum31" text:continue-numbering="true">
        <text:list-item>
          <text:p text:style-name="P590"><text:span text:style-name="T1220">상상할 수 없을 만큼 거대한 불국토를 정화하는 것은 모든 생명을 위한 완벽한 영적 쉼터를 가꾸는 일이다.</text:span><text:span/></text:p>
        </text:list-item>
        <text:list-item>
          <text:p text:style-name="P591"><text:span text:style-name="T1221">사의불가해한 보살의 원력은 인간의 좁은 계산과 상상의 한계를 뛰어넘는 무한한 스케일을 가진다.</text:span><text:span/></text:p>
        </text:list-item>
        <text:list-item>
          <text:p text:style-name="P592"><text:span text:style-name="T1222">명호를 지니게 한다는 것은 위급한 순간에 언제든 구원받을 수 있는 영적인 핫라인을 개설해 주는 것이다.</text:span><text:span/></text:p>
        </text:list-item>
        <text:list-item>
          <text:p text:style-name="P593"><text:span text:style-name="T1223">이름이 시방에 머문다는 것은 공간의 제약 없이 우주 어디든 자비의 에너지를 도달하게 하겠다는 다짐이다.</text:span><text:span/></text:p>
        </text:list-item>
      </text:list>
      <text:p text:style-name="P594"><text:span><text:soft-page-break/></text:span><text:span/><text:span/></text:p>
      <text:p text:style-name="P595"><text:span text:style-name="T1224">[🟢 Online Mode | 26.06.08_14:06:51]</text:span><text:span/></text:p>
      <text:p text:style-name="P596"><text:span text:style-name="T1225">31. 몸과 말, 마음을 깨끗이 씻어내는 삼업의 정화</text:span><text:span/></text:p>
      <text:p text:style-name="P597"><text:span text:style-name="T1226">🔑 핵심 키워드: 신업 정화, 구업 정화, 의업 정화, 불선업 차단</text:span><text:span/></text:p>
      <text:p text:style-name="P598"><text:span text:style-name="T1227">🧼 몸으로 짓는 행동의 청정구역</text:span><text:span/></text:p>
      <text:p text:style-name="P599"><text:span text:style-name="T1228">우리가 일상에서 몸으로 행하는 모든 물리적인 행동들을 티끌 하나 없이 깨끗하게 관리하겠다는 다짐이야. 누군가를 해치거나 남의 물건을 탐내는 거친 행동들을 완전히 멈추고, 온전히 생명을 살리고 도우려는 행동으로 삶을 채워가는 단계지. 이것은 마치 매일 바깥에서 묻혀온 먼지와 때로 꼬질꼬질해진 옷을 성능 좋은 세탁기에 넣고 시원하게 돌려, 처음 샀을 때처럼 하얗고 깨끗한 상태로 복원하는 과정과 아주 똑같아.</text:span><text:span/></text:p>
      <text:p text:style-name="P600"><text:span text:style-name="T1229">🗣️ 맑은 메아리를 만드는 언어의 정화</text:span><text:span/></text:p>
      <text:p text:style-name="P601"><text:span text:style-name="T1230">말은 한 번 뱉으면 주워 담을 수 없기에 입으로 짓는 언어의 에너지를 맑게 거르는 작업이 절대적으로 필요해. 거짓말이나 이간질, 거친 욕설을 멈추고 상대방을 위로하고 살리는 진실한 말만 세상에 전하겠다는 약속이지. 깊은 산속에서 내가 맑고 고운 목소리로 노래를 부르면 온 산이 아름다운 메아리로 화답하듯이, 내 입술을 거쳐 나가는 모든 소리의 주파수를 청정하게 조율하는 일이라고 이해하면 돼.</text:span><text:span/></text:p>
      <text:p text:style-name="P602"><text:span text:style-name="T1231">🧠 마음속 악성코드를 막는 방화벽</text:span><text:span/></text:p>
      <text:p text:style-name="P603"><text:span text:style-name="T1232">몸과 말의 뿌리가 되는 내면의 생각과 의도까지 완전히 정화하여 부정적인 씨앗이 자라지 못하게 막는 단계야. 남을 시기하거나 미워하는 마음, 어리석은 집착들이 생각의 표면으로 떠오르기 전에 미리 알아차리고 지워버리는 과정이지. 컴퓨터 시스템에 강력한 실시간 방화벽과 최신 백신 프로그램을 항상 켜두어, 외부에서 침투하려는 악성코드나 악성 바이러스를 진입 단계에서부터 완벽하게 걸러내는 것과 같은 이치야.</text:span><text:span/></text:p>
      <text:p text:style-name="P604"><text:span text:style-name="T1233">🚫 불선업을 원천 봉쇄하는 강력한 브레이크</text:span><text:span/></text:p>
      <text:p text:style-name="P605"><text:span text:style-name="T1234">결국 몸과 말, 마음의 세 가지 통로를 모두 깨끗하게 청소함으로써 해로운 행동인 불선업을 절대로 짓지 않겠다고 빗장을 단단히 잠그는 결론에 도달해. 가파른 내리막길을 달리는 자동차가 위험한 낭떠러지를 만났을 때 성능 좋은 브레이크 패드가 바퀴를 꽉 잡아 멈춰 세우는 것처럼 말이야. 내면의 도덕적 브레이크를 완벽하게 정비해 두면 어떤 거친 유혹이나 번뇌가 밀려와도 단호하게 제자리에 멈춰 서서 스스로를 영적으로 보호할 수 있게 돼.</text:span><text:span/></text:p>
      <text:p text:style-name="P606"><text:span text:style-name="T1235">📝 핵심 요약</text:span><text:span/></text:p>
      <text:list text:style-name="WWNum32" text:continue-numbering="true">
        <text:list-item>
          <text:p text:style-name="P607"><text:span text:style-name="T1236">몸으로 행하는 모든 물리적 행동을 깨끗이 씻어내어 중생에게 해를 끼치지 않는 청정함을 유지함.</text:span><text:span/></text:p>
        </text:list-item>
        <text:list-item>
          <text:p text:style-name="P608"><text:span text:style-name="T1237">입으로 내뱉는 언어의 에너지를 맑게 걸러내어 진실하고 따뜻한 메아리만 세상에 흘려보냄.</text:span><text:span/></text:p>
        </text:list-item>
        <text:list-item>
          <text:p text:style-name="P609"><text:span text:style-name="T1238">행동과 말의 뿌리가 되는 마음속에 강력한 방화벽을 세워 부정적인 생각을 실시간으로 정화함.</text:span><text:span/></text:p>
        </text:list-item>
        <text:list-item>
          <text:p text:style-name="P610"><text:span text:style-name="T1239">신구의 삼업을 완벽하게 통제함으로써 해로운 불선업의 발생을 원천 봉쇄하고 영적 안전장치를 마련함.</text:span><text:span/></text:p>
        </text:list-item>
      </text:list>
      <text:p text:style-name="P611"><text:span><text:soft-page-break/></text:span><text:span/><text:span/></text:p>
      <text:p text:style-name="P612"><text:span text:style-name="T1240">32. 행심의 본질과 삼종계를 통한 신구의의 정화</text:span><text:span/></text:p>
      <text:p text:style-name="P613"><text:span text:style-name="T1241">🔑 핵심 키워드: 행심, 율의, 삼종계, 신구의 정화, 학처 공경</text:span><text:span/></text:p>
      <text:p text:style-name="P614"><text:span text:style-name="T1242">🚗 실천으로 굴러가는 생명의 바퀴</text:span><text:span/></text:p>
      <text:p text:style-name="P615"><text:span text:style-name="T1243">행심은 단순히 마음속으로만 좋은 뜻을 품는 것을 넘어, 모든 생명을 구하기 위해 실제로 행동으로 옮기는 강력한 실천의 힘이야. 이것은 마치 목적지를 향해 실제로 바퀴를 힘차게 굴려 나아가는 자동차와 아주 비슷하지. 이 위대한 실천을 안전하게 지탱해 주는 튼튼한 도로의 역할을 하는 것이 바로 규율이자 약속인 율의란다. 이 단단한 약속의 토대 위에 내 마음을 딱 붙잡아 둘 때, 우리의 영적 여정은 흔들림 없이 바른 선로를 따라 전진할 수 있게 돼.</text:span><text:span/></text:p>
      <text:p text:style-name="P616"><text:span text:style-name="T1244">🚰 몸과 말과 생각을 맑히는 여과 장치</text:span><text:span/></text:p>
      <text:p text:style-name="P617"><text:span text:style-name="T1245">우리가 매일 일상에서 몸으로 행동하고, 말로 표현하고, 마음으로 생각하는 세 가지 통로는 수많은 번뇌와 집착으로 오염되기 무척 쉬워. 행심의 본질인 규율에 머무는 것은 이 세 가지 통로에 깨끗하고 정밀한 고성능 정수기 필터를 장착하는 것과 같지. 이 든든한 필터를 통해 거친 행동과 상처 주는 말이 차례로 걸러지면서, 우리의 삶은 안팎으로 온전하고 맑은 순수함과 신성함으로 가득 차오르게 된단다.</text:span><text:span/></text:p>
      <text:p text:style-name="P618"><text:span text:style-name="T1246">🏋️ 삼종계라는 세 가지 완벽한 훈련 코스</text:span><text:span/></text:p>
      <text:p text:style-name="P619"><text:span text:style-name="T1247">우리의 정신과 행동을 가장 완벽한 상태로 가꾸기 위해 성자들은 삼종계라는 세 가지 핵심 학습 코스를 준비해 두셨어. 해로운 일을 멈추는 것, 좋은 선행을 적극적으로 쌓는 것, 그리고 세상의 모든 존재를 이롭게 돕는 것이 바로 그것이지. 마치 우리 몸의 모든 근육을 골고루 발달시켜 건강한 신체를 만드는 전신 운동 프로그램처럼, 이 세 가지 계율을 치우침 없이 조화롭게 닦아나갈 때 우리의 영성은 비약적으로 성장하게 돼.</text:span><text:span/></text:p>
      <text:p text:style-name="P620"><text:span text:style-name="T1248">💎 깊어지는 공경심과 영적 선순환</text:span><text:span/></text:p>
      <text:p text:style-name="P621"><text:span text:style-name="T1249">이 세 가지 계율을 정성껏 배우고 삶 속에서 실천하다 보면, 처음에는 제한처럼 느껴졌던 규칙들이 사실은 나를 보호하는 소중한 보물임을 스스로 깨닫게 돼. 가치 있는 명품의 진가를 깊이 이해할수록 그것을 더욱 아끼고 조심스럽게 다루는 것처럼, 계율의 학처에 대한 공경심이 내면에서 크게 솟구치게 되지. 이 깊은 존중의 마음은 다시 우리를 더 철저한 실천으로 이끄는 아름다운 영적 선순환을 완성해 준단다.</text:span><text:span/></text:p>
      <text:p text:style-name="P622"><text:span text:style-name="T1250">📝 핵심 요약</text:span><text:span/></text:p>
      <text:list text:style-name="WWNum33" text:continue-numbering="true">
        <text:list-item>
          <text:p text:style-name="P623"><text:span text:style-name="T1251">행심은 마음의 다짐을 넘어 실제로 행동하는 힘이며, 율의는 이를 지탱하는 실천의 토대이다.</text:span><text:span/></text:p>
        </text:list-item>
        <text:list-item>
          <text:p text:style-name="P624"><text:span text:style-name="T1252">규율에 머무는 것은 몸과 말과 생각의 세 가지 통로를 깨끗하게 걸러주는 정수기 필터와 같다.</text:span><text:span/></text:p>
        </text:list-item>
        <text:list-item>
          <text:p text:style-name="P625"><text:span text:style-name="T1253">삼종계는 해악 방지, 선행 축적, 중생 구제라는 세 가지 차원의 균형 잡힌 영적 훈련 코스다.</text:span><text:span/></text:p>
        </text:list-item>
        <text:list-item>
          <text:p text:style-name="P626"><text:span text:style-name="T1254">계율을 바르게 학습하면 그 가치를 깊이 깨달아 학처를 크게 공경하는 선순환이 일어난다.</text:span><text:span/></text:p>
        </text:list-item>
      </text:list>
      <text:p text:style-name="P627"><text:span><text:soft-page-break/></text:span><text:span/><text:span/></text:p>
      <text:p text:style-name="P628"><text:span text:style-name="T1255">33. 보살의 계율 실천과 깨달음의 자량 완성</text:span><text:span/></text:p>
      <text:p text:style-name="P629"><text:span text:style-name="T1256">🔑 핵심 키워드: 보살의 율의계, 원만보리, 대보리의 자량, 부단한 정진</text:span><text:span/></text:p>
      <text:p text:style-name="P630"><text:span text:style-name="T1257">🛡️ 청정한 깨달음을 향한 안전 장치, 보살의 율의계</text:span><text:span/></text:p>
      <text:p text:style-name="P631"><text:span text:style-name="T1258">모든 생명을 구하겠다는 거룩한 뜻을 품은 보살들이 반드시 지켜야 하는 행동 지침이 바로 보살의 율의계야. 이 계율들은 우리 마음이 나쁜 길로 빠지지 않도록 단단하게 붙잡아주는 최고의 안전장치란다. 비유하자면 대륙을 가로지르는 긴 기차여행을 할 때 탈선하지 않도록 바닥을 든든하게 지탱해 주는 철길이나, 험난한 절벽 길에 설치된 튼튼한 가드레일과 아주 비슷해. 이 규칙들을 소중히 지킬 때 우리는 비로소 흐트러짐 없이 가장 청정하고 완전한 깨달음의 상태를 향해</text:span><text:span text:style-name="T1259"> 똑바로 걸어갈 수 있게 돼.</text:span><text:span/></text:p>
      <text:p text:style-name="P632"><text:span text:style-name="T1260">🎯 원만보리라는 흔들리지 않는 과녁</text:span><text:span/></text:p>
      <text:p text:style-name="P633"><text:span text:style-name="T1261">보살들이 이 계율을 행할 때 마음속으로 깊이 집중하고 바라보는 대상은 바로 원만한 보리, 즉 세상에서 가장 완벽하고 순수한 깨달음이야. 마음의 눈을 다른 곳에 팔지 않고 오직 이 고귀한 목표만을 뚜렷하게 겨냥하는 거지. 이는 마치 명사수가 화살을 쏠 때 주변에서 바람이 불고 새가 날아가도 오직 과녁의 정중앙 붉은 점만을 뚫어지게 응시하는 것과 똑같은 이치란다. 목표가 이토록 명확하고 순수하기 때문에 보살의 모든 행동에는 강력한 힘과 방향성이 생겨나게 되는</text:span><text:span text:style-name="T1262"> 거야.</text:span><text:span/></text:p>
      <text:p text:style-name="P634"><text:span text:style-name="T1263">🏃 매일의 땀방울로 채우는 부단한 정진</text:span><text:span/></text:p>
      <text:p text:style-name="P635"><text:span text:style-name="T1264">이 위대한 계율들은 단순히 머리로 이해하는 것에 그치지 않고, 삶 속에서 열심히 그리고 부단히 실천해야만 진짜 힘을 발휘해. 매일매일 포기하지 않고 정성을 들이는 정진의 태도가 필수적이지. 마당에 심은 작은 나무에 하루도 빠짐없이 물을 주고 가꾸어야 마침내 아름다운 꽃이 피고 달콤한 열매가 맺히는 것처럼 말이야. 혹은 세계적인 스포츠 선수가 매일 땀 흘려 훈련하며 몸의 근육을 키우듯, 우리 마음의 선한 근육도 매순간 계율을 실천하는 부지런함을 통해 비로소</text:span><text:span text:style-name="T1265"> 단단하게 완성되는 법이란다.</text:span><text:span/></text:p>
      <text:p text:style-name="P636"><text:span text:style-name="T1266">📦 깨달음의 여행을 위한 든든한 배낭, 대보리의 자량</text:span><text:span/></text:p>
      <text:p text:style-name="P637"><text:span text:style-name="T1267">계율을 열심히 실천하면 마침내 대보리의 자량, 즉 위대한 깨달음을 얻기 위해 필요한 모든 복덕과 지혜의 에너지를 완벽하게 쌓아 올리게 돼. 자량이라는 것은 영적인 보물창고를 가득 채우는 보석들과 같아. 비유하자면 세계에서 가장 높은 에베레스트 산을 오르기 전에, 정상까지 안전하게 버틸 수 있도록 두꺼운 패딩과 산소통, 따뜻한 음식을 배낭 속에 빈틈없이 가득 채워 넣는 과정과 아주 비슷하단다. 계율의 실천을 통해 이 자량들이 완벽하게 구족되면, 보살은 마침</text:span><text:span text:style-name="T1268">내 어떤 시련도 이겨내고 최종적인 깨달음의 정상에 우뚝 서게 되지.</text:span><text:span/></text:p>
      <text:p text:style-name="P638"><text:span text:style-name="T1269">📝 핵심 요약</text:span><text:span/></text:p>
      <text:list text:style-name="WWNum34" text:continue-numbering="true">
        <text:list-item>
          <text:p text:style-name="P639"><text:span text:style-name="T1270">보살의 율의계는 청정한 깨달음의 길에서 탈선하지 않도록 돕는 기차 철길 같은 안전장치다.</text:span><text:span/></text:p>
        </text:list-item>
        <text:list-item>
          <text:p text:style-name="P640"><text:span text:style-name="T1271">명사수가 과녁 중심을 보듯, 오직 원만한 보리라는 최고 수준의 깨달음만을 명확히 지향한다.</text:span><text:span/></text:p>
        </text:list-item>
        <text:list-item>
          <text:p text:style-name="P641"><text:span text:style-name="T1272">나무에 매일 물을 주며 가꾸듯, 일상 속에서 부단하고 열심히 계율을 실천하는 정진이 필요하다.</text:span><text:span/></text:p>
        </text:list-item>
        <text:list-item>
          <text:p text:style-name="P642"><text:span text:style-name="T1273">계율을 행함으로써 영적 여행을 위한 필수 조건인 복덕과 지혜의 자량을 완벽하게 구족하게 된다.</text:span><text:span/></text:p>
        </text:list-item>
      </text:list>
      <text:p text:style-name="P643"><text:span><text:soft-page-break/></text:span><text:span/><text:span/></text:p>
      <text:p text:style-name="P644"><text:span text:style-name="T1274">[🟢 Online Mode | 26.06.08_14:07:12]</text:span><text:span/></text:p>
      <text:p text:style-name="P645"><text:span text:style-name="T1275">34. 신통력의 발현과 두 가지 자량의 완벽한 구족</text:span><text:span/></text:p>
      <text:p text:style-name="P646"><text:span text:style-name="T1276">🔑 핵심 키워드: 복덕자량, 지혜자량, 신통력, 부처의 승인, 자량 구족</text:span><text:span/></text:p>
      <text:p text:style-name="P647"><text:span text:style-name="T1277">💎 두 가지 영적 자산의 완성</text:span><text:span/></text:p>
      <text:p text:style-name="P648"><text:span text:style-name="T1278">부처가 되기 위해 반드시 쌓아야 하는 두 가지 거대한 자산이 바로 복덕과 지혜라는 자량이야. 복덕은 긍정적인 에너지와 선행의 힘이고, 지혜는 우주의 진리를 꿰뚫어 보는 힘이지. 이것은 마치 목적지까지 안전하게 날아가기 위해 비행기에 날개 두 개를 완벽하게 장착하는 것과 같단다. 한쪽 날개만으로는 결코 하늘 높이 날아오를 수 없듯이, 이 두 가지 자산이 균형 있게 가득 차야만 비로소 완전한 깨달음의 경지에 도달할 수 있어.</text:span><text:span/></text:p>
      <text:p text:style-name="P649"><text:span text:style-name="T1279">🚀 속도를 높이는 최고의 부스터, 신통력</text:span><text:span/></text:p>
      <text:p text:style-name="P650"><text:span text:style-name="T1280">모든 부처님들은 이 두 가지 영적 자산을 가장 빠르게 채울 수 있는 핵심 원인으로 바로 신통력을 꼽으셨어. 평범한 방법으로 자산을 쌓는 것이 걸어서 대륙을 횡단하는 느린 여정이라면, 신통력을 일으키는 것은 최고속 열차나 초고속 비행기를 타고 순식간에 목적지에 도달하는 것과 비슷하지. 내면의 미세한 능력을 깨워 신통력을 발휘할 때, 복덕과 지혜를 모으는 영적 성장의 속도가 상상을 초월할 정도로 빨라지게 된단다.</text:span><text:span/></text:p>
      <text:p text:style-name="P651"><text:span text:style-name="T1281">🌍 이타행의 범위를 넓히는 영적 센서</text:span><text:span/></text:p>
      <text:p text:style-name="P652"><text:span text:style-name="T1282">여기서 말하는 신통력은 단순히 남에게 과시하기 위한 마술 같은 기술이 아니야. 수많은 중생의 마음과 고통을 단번에 알아차리고 그들에게 가장 필요한 도움을 즉각적으로 베풀 수 있는 고성능 영적 센서이자 소통 도구지. 눈먼 이들에게 길을 안내할 때 내 눈이 밝아야 하듯, 신통력이라는 밝은 눈을 가질 때 비로소 더 많은 중생을 한 번에 구제하며 거대한 복덕을 순식간에 쌓을 수 있게 돼.</text:span><text:span/></text:p>
      <text:p text:style-name="P653"><text:span text:style-name="T1283">📊 부처들의 한결같은 승인과 증명</text:span><text:span/></text:p>
      <text:p text:style-name="P654"><text:span text:style-name="T1284">과거와 현재, 미래의 모든 부처님들께서도 이 원리를 한결같이 승인하고 인정하셨어. 최고의 과학자들이 수많은 실험을 통해 입증된 완벽한 공식을 발표하듯, 깨달음을 얻은 성자들이 직접 경험하고 검증한 가장 확실한 지름길이라는 뜻이야. 영적 성장의 대가들이 보증하는 이 확실한 방법을 신뢰하고 내면의 에센스를 닦아 나갈 때, 우리는 온갖 한계를 넘어 궁극의 자량을 완벽하게 구족할 수 있어.</text:span><text:span/></text:p>
      <text:p text:style-name="P655"><text:span text:style-name="T1285">📝 핵심 요약</text:span><text:span/></text:p>
      <text:list text:style-name="WWNum35" text:continue-numbering="true">
        <text:list-item>
          <text:p text:style-name="P656"><text:span text:style-name="T1286">부처의 경지에 오르기 위해서는 선행의 힘인 복덕과 진리의 힘인 지혜라는 두 가지 날개가 반드시 필요해.</text:span><text:span/></text:p>
        </text:list-item>
        <text:list-item>
          <text:p text:style-name="P657"><text:span text:style-name="T1287">모든 부처님들은 복덕과 지혜의 자산을 가장 빠르게 채우는 결정적인 열쇠가 바로 신통력이라고 가르치셨어.</text:span><text:span/></text:p>
        </text:list-item>
        <text:list-item>
          <text:p text:style-name="P658"><text:span text:style-name="T1288">신통력은 과시용 기술이 아니라 중생의 고통을 돕는 고성능 센서이며 영적 성장의 속도를 높이는 부스터야.</text:span><text:span/></text:p>
        </text:list-item>
        <text:list-item>
          <text:p text:style-name="P659"><text:span text:style-name="T1289">깨달음의 대가들이 검증한 이 공식을 믿고 내면을 닦을 때 한계를 넘어 궁극의 자량을 온전히 성취할 수 있어.</text:span><text:span/></text:p>
        </text:list-item>
      </text:list>
      <text:p text:style-name="P660"><text:span><text:soft-page-break/></text:span><text:span/><text:span/></text:p>
      <text:p text:style-name="P661"><text:span text:style-name="T1290">[🟢 Online Mode | 26.06.08_14:07:33]</text:span><text:span/></text:p>
      <text:p text:style-name="P662"><text:span text:style-name="T1291">35. 날개 없는 새와 신통력의 비유</text:span><text:span/></text:p>
      <text:p text:style-name="P663"><text:span text:style-name="T1292">🔑 핵심 키워드: 신통력, 유정의 이익, 날개 없는 새, 자비의 실천, 영적 능력</text:span><text:span/></text:p>
      <text:p text:style-name="P664"><text:span text:style-name="T1293">🪶 날개를 펼치지 못한 어린 새의 한계</text:span><text:span/></text:p>
      <text:p text:style-name="P665"><text:span text:style-name="T1294">둥지 안의 어린 새가 아무리 높은 하늘을 자유롭게 날고 싶어 마음에 간절한 소망을 품는다고 해도, 깃털이 다 자라지 않고 날개 힘이 없으면 절대로 창공으로 날아오를 수 없어. 바닥에서 퍼덕거리며 안타깝게 날갯짓을 해보지만 결국 제자리로 떨어질 뿐이지. 마음은 굴뚝같아도 물리적인 조건이나 힘이 갖추어지지 않으면 목적지에 도달할 수 없다는 지극히 당연하고도 냉정한 자연의 이치야.</text:span><text:span/></text:p>
      <text:p text:style-name="P666"><text:span text:style-name="T1295">👁️ 이타적 마음을 완성하는 강력한 도구</text:span><text:span/></text:p>
      <text:p text:style-name="P667"><text:span text:style-name="T1296">마찬가지로 우리가 고통받는 모든 중생을 구하겠다는 위대한 보리심을 내었더라도, 마음의 눈이 열리는 신통력을 갖추지 못하면 진정으로 유정의 이익을 행할 수 없단다. 여기서 말하는 신통력은 단순히 마술을 부리는 기이한 능력이 아니라, 상대방의 마음을 꿰뚫어 보고 그들이 무엇 때문에 괴로워하는지 정확하게 읽어내는 고차원적인 인지 능력이지. 이런 능력이 빠진 자비심은 날개 없는 새의 날갯짓처럼 마음만 앞설 뿐 실제적인 도움을 주지 못하게 돼.</text:span><text:span/></text:p>
      <text:p text:style-name="P668"><text:span text:style-name="T1297">🎯 원인을 정확히 짚어내는 명의의 처방</text:span><text:span/></text:p>
      <text:p text:style-name="P669"><text:span text:style-name="T1298">비유하자면, 환자를 살리고 싶은 마음이 누구보다 간절한 의사가 정작 환자의 몸 어디가 아픈지 진단할 수 있는 엑스레이 장비나 의학 지식이 전혀 없는 상태와 같아. 아무리 좋은 마음으로 약을 지어주려고 해도 청진기조차 없으니 엉뚱한 처방을 내려 오히려 환자를 위험하게 만들 수도 있지. 신통력이라는 정밀한 센서가 있어야만 상대방의 업과 근기를 정확히 파악해서 꼭 필요한 영혼의 처방전을 건넬 수 있는 거야.</text:span><text:span/></text:p>
      <text:p text:style-name="P670"><text:span text:style-name="T1299">💎 지혜와 자비가 결합한 참된 구원의 길</text:span><text:span/></text:p>
      <text:p text:style-name="P671"><text:span text:style-name="T1300">결국 남을 돕는다는 것은 뜨거운 가슴만으로는 불가능하며, 냉철하고 명석한 영적 능력이 반드시 함께 결합해야 비로소 완성되는 위대한 불사야. 따뜻한 마음이라는 연료에 신통력이라는 튼튼한 날개를 달아야만 비로소 고통의 늪에 빠진 중생들을 구하러 넓은 세상으로 힘차게 날아오를 수 있거든. 지혜와 힘을 고루 갖추어 실질적인 구원의 이정표를 세우는 것, 그것이 바로 대승의 수행자가 반드시 신통력을 닦아야 하는 진짜 이유란다.</text:span><text:span/></text:p>
      <text:p text:style-name="P672"><text:span text:style-name="T1301">📝 핵심 요약</text:span><text:span/></text:p>
      <text:list text:style-name="WWNum36" text:continue-numbering="true">
        <text:list-item>
          <text:p text:style-name="P673"><text:span text:style-name="T1302">날개가 자라지 않은 어린 새는 아무리 원해도 하늘을 날 수 없다.</text:span><text:span/></text:p>
        </text:list-item>
        <text:list-item>
          <text:p text:style-name="P674"><text:span text:style-name="T1303">신통력을 갖추지 못하면 중생을 구하려는 마음이 있어도 실질적인 이익을 주기 어렵다.</text:span><text:span/></text:p>
        </text:list-item>
        <text:list-item>
          <text:p text:style-name="P675"><text:span text:style-name="T1304">신통력은 환자를 정확히 진단하는 명의의 기술처럼 중생의 고통을 꿰뚫어 보는 힘이다.</text:span><text:span/></text:p>
        </text:list-item>
        <text:list-item>
          <text:p text:style-name="P676"><text:span text:style-name="T1305">참된 자비의 실천을 위해서는 뜨거운 마음과 함께 명석한 영적 능력이 반드시 필요하다.</text:span><text:span/></text:p>
        </text:list-item>
      </text:list>
      <text:p text:style-name="P677"><text:span><text:soft-page-break/></text:span><text:span/><text:span/></text:p>
      <text:p text:style-name="P678"><text:span text:style-name="T1306">[🟢 Online Mode | 26.06.08_14:07:38]</text:span><text:span/></text:p>
      <text:p text:style-name="P679"><text:span text:style-name="T1307">36. 🔮 신통력을 지닌 이의 압도적인 복덕</text:span><text:span/></text:p>
      <text:p text:style-name="P680"><text:span text:style-name="T1308">🔑 핵심 키워드: 신통력, 복덕 축적, 백생의 노력, 방편의 차이</text:span><text:span/></text:p>
      <text:p text:style-name="P681"><text:span text:style-name="T1309">신통력을 지닌 존재가 하루 동안 쌓는 복덕의 양은 일반 사람이 백 번을 다시 태어나 노력해도 따라잡을 수 없을 만큼 압도적이야. 이것은 마치 전 세계의 정보가 담긴 거대한 데이터베이스에서 수동으로 책을 한 권씩 찾아 적는 사람과, 초고속 검색 엔진을 기동해 단 1초 만에 수백만 개의 데이터를 한꺼번에 다운로드하는 성능 차이와 같지. 영적인 능력이 깨어난 상태에서의 행동은 그 효율성과 깊이 면에서 일반적인 차원을 완전히 초월해 버리거든.</text:span><text:span/></text:p>
      <text:p text:style-name="P682"><text:span text:style-name="T1310">영적인 눈과 귀가 열린 상태에서 행하는 선행은 그 행위의 본질과 대상을 정확하게 꿰뚫어 보기 때문에 한 치의 오차도 없이 엄청난 에너지를 발생시켜. 눈을 가린 채 화살을 쏘면 아무리 많이 쏴도 과녁에 맞추기 힘들지만, 최첨단 레이더 조준경을 장착하고 화살을 쏘면 단 한 발만으로도 정확하게 과녁 정중앙을 명중시키는 것과 똑같은 이치야. 지혜와 영적 능력이 결합한 하루는 어둠 속에서 방황하는 수많은 세월보다 훨씬 더 밀도 높은 가치를 지니고 있어.</text:span><text:span/></text:p>
      <text:p text:style-name="P683"><text:span text:style-name="T1311">반면에 이러한 영적인 신통력이 없는 평범한 상태에서는 아무리 오랜 세월 동안 애쓰고 선행을 베풀어도 그 공덕이 쌓이는 속도가 더딜 수밖에 없어. 흙을 파서 거대한 댐을 건설해야 하는데, 굴착기 같은 중장비 없이 오직 맨손과 조그만 삽 한 자루만 가지고 백 년 동안 땅을 파고 있는 안타까운 모습과 닮아 있지. 방향성과 도구가 정확하지 않으면 아무리 많은 땀을 흘려도 결과물의 차이는 메워지기 힘든 법이니까.</text:span><text:span/></text:p>
      <text:p text:style-name="P684"><text:span text:style-name="T1312">결국 이 게송이 우리에게 주는 메시지는 단순히 초능력을 부러워하라는 게 아니라, 마음의 눈을 뜨고 영적인 능력을 개발하는 수행이 왜 그토록 중요한지를 일깨워주는 거야. 올바른 방편을 통해 내면의 미세한 에너지를 깨우고 지혜를 넓힐 때, 우리의 하루는 남들의 평생을 뛰어넘는 위대한 도약의 순간이 될 수 있어. 이 영적인 도구의 힘을 명확히 인지하고 나아갈 때 우리는 비로소 성불이라는 궁극의 목적지에 가장 빠르게 도달할 수 있게 돼.</text:span><text:span/></text:p>
      <text:p text:style-name="P685"><text:span text:style-name="T1313">📝 핵심 요약</text:span><text:span/></text:p>
      <text:list text:style-name="WWNum37" text:continue-numbering="true">
        <text:list-item>
          <text:p text:style-name="P686"><text:span text:style-name="T1314">신통력을 지닌 존재의 하루 복덕은 일반인의 백생에 걸친 노력보다 압도적으로 크다.</text:span><text:span/></text:p>
        </text:list-item>
        <text:list-item>
          <text:p text:style-name="P687"><text:span text:style-name="T1315">영적 능력이 깨어난 상태의 행위는 초고속 검색 엔진처럼 고도로 집중된 효율성을 지닌다.</text:span><text:span/></text:p>
        </text:list-item>
        <text:list-item>
          <text:p text:style-name="P688"><text:span text:style-name="T1316">올바른 영적 도구와 지혜가 없을 때의 노력은 맨손으로 땅을 파는 것처럼 지체되기 쉽다.</text:span><text:span/></text:p>
        </text:list-item>
        <text:list-item>
          <text:p text:style-name="P689"><text:span text:style-name="T1317">내면의 미세 에너지를 깨우는 수행은 유한한 시간 속에서 성불을 이루는 결정적인 열쇠이다.</text:span><text:span/></text:p>
        </text:list-item>
      </text:list>
      <text:p text:style-name="P690"><text:span><text:soft-page-break/></text:span><text:span/><text:span/></text:p>
      <text:p text:style-name="P691"><text:span text:style-name="T1318">[🟢 Online Mode | 26.06.08_14:15:22]</text:span><text:span/></text:p>
      <text:p text:style-name="P692"><text:span text:style-name="T1319">37. 원만보리의 자량 구족과 정진의 신통력</text:span><text:span/></text:p>
      <text:p text:style-name="P693"><text:span text:style-name="T1320">🔑 핵심 키워드: 원만보리, 자량 구족, 신통력, 근수와 나태</text:span><text:span/></text:p>
      <text:p text:style-name="P694"><text:span text:style-name="T1321">🚀 번개처럼 빠른 깨달음을 위한 연료, 보리 자량</text:span><text:span/></text:p>
      <text:p text:style-name="P695"><text:span text:style-name="T1322">깨달음이라는 최고의 목적지에 신속하게 도달하고 싶다면 가장 먼저 마음의 영양분인 자량을 풍부하게 쌓아야 해. 복덕과 지혜라는 두 가지 자량은 영적 여정을 지탱하는 거대한 연료 탱크와 같지. 장거리 우주 비행을 떠나는 로켓에 최고급 연료를 가득 채우는 것처럼, 이 연료를 온전하게 구족해야만 지치지 않고 단숨에 피안의 세계로 날아오를 수 있는 강력한 추진력을 얻게 되는 거야.</text:span><text:span/></text:p>
      <text:p text:style-name="P696"><text:span text:style-name="T1323">🦅 영적인 비행을 돕는 초능력, 신통의 필요성</text:span><text:span/></text:p>
      <text:p text:style-name="P697"><text:span text:style-name="T1324">중생을 효율적으로 구제하고 깨달음의 속도를 높이기 위해서는 미세한 마음의 눈인 신통력이 반드시 필요해. 신통은 허황된 마술이 아니라 중생의 마음을 정확히 읽고 알맞은 가르침을 전하기 위한 일종의 영적 센서 시스템이지. 어두운 밤바다를 항해할 때 고성능 레이더와 야간 투시경을 장착하는 것처럼, 이 고성능 장비를 갖추어야만 짙은 미혹의 안개를 뚫고 수많은 유정들을 안전하게 구원의 길로 인도할 수 있어.</text:span><text:span/></text:p>
      <text:p text:style-name="P698"><text:span text:style-name="T1325">🔥 나태함을 불태우는 치열한 정진과 근수</text:span><text:span/></text:p>
      <text:p text:style-name="P699"><text:span text:style-name="T1326">이러한 신비로운 지혜와 신통은 가만히 앉아서 감이 떨어지기를 기다리는 이에게는 절대 주어지지 않아. 자전거를 탈 때 페달을 밟는 발걸음을 멈추는 순간 앞으로 나아가지 못하고 쓰러지듯이, 영적인 성장도 쉬지 않고 에너지를 쏟아붓는 근수의 힘으로만 비로소 완성되는 법이야.</text:span><text:span/></text:p>
      <table:table table:style-name="ta5">
        <table:table-columns>
          <table:table-column table:style-name="co12"/>
          <table:table-column table:style-name="co13"/>
          <table:table-column table:style-name="co14"/>
        </table:table-columns>
        <table:table-header-rows>
          <table:table-row table:style-name="ro16" table:default-cell-style-name="ce46">
            <table:table-cell table:style-name="ce47">
              <text:p text:style-name="P700"><text:span text:style-name="T1327">구분</text:span><text:span/></text:p>
            </table:table-cell>
            <table:table-cell table:style-name="ce48">
              <text:p text:style-name="P701"><text:span text:style-name="T1328">근수</text:span><text:span/></text:p>
            </table:table-cell>
            <table:table-cell table:style-name="ce49">
              <text:p text:style-name="P702"><text:span text:style-name="T1329">나태</text:span><text:span/></text:p>
            </table:table-cell>
          </table:table-row>
        </table:table-header-rows>
        <table:table-row table:style-name="ro17" table:default-cell-style-name="ce46">
          <table:table-cell table:style-name="ce50">
            <text:p text:style-name="P703"><text:span text:style-name="T1330">영적 상태</text:span><text:span/></text:p>
          </table:table-cell>
          <table:table-cell table:style-name="ce51">
            <text:p text:style-name="P704"><text:span text:style-name="T1331">끊임없이 구르는 자전거</text:span><text:span/></text:p>
          </table:table-cell>
          <table:table-cell table:style-name="ce52">
            <text:p text:style-name="P705"><text:span text:style-name="T1332">녹슬어 멈춘 브레이크</text:span><text:span/></text:p>
          </table:table-cell>
        </table:table-row>
        <table:table-row table:style-name="ro18" table:default-cell-style-name="ce46">
          <table:table-cell table:style-name="ce53">
            <text:p text:style-name="P706"><text:span text:style-name="T1333">수행 결과</text:span><text:span/></text:p>
          </table:table-cell>
          <table:table-cell table:style-name="ce54">
            <text:p text:style-name="P707"><text:span text:style-name="T1334">신통과 자량의 원만 구족</text:span><text:span/></text:p>
          </table:table-cell>
          <table:table-cell table:style-name="ce55">
            <text:p text:style-name="P708"><text:span text:style-name="T1335">영적 정체와 윤회의 반복</text:span><text:span/></text:p>
          </table:table-cell>
        </table:table-row>
      </table:table>
      <text:p text:style-name="P709"><text:span text:style-name="T1336">⚙️ 영적 게으름이라는 치명적인 브레이크 해제</text:span><text:span/></text:p>
      <text:p text:style-name="P710"><text:span text:style-name="T1337">나태함과 게으름은 우리 마음의 바퀴를 꽉 붙잡고 움직이지 못하게 만드는 치명적인 녹과 같아. 주차 브레이크를 채운 채 엑셀을 아무리 밝아보아야 에너지만 낭비되고 자동차는 앞으로 나아갈 수 없잖아. 이처럼 아무리 좋은 목적지와 훌륭한 연료가 준비되어 있어도 내면의 게으름을 단호하게 잘라내지 않으면 단 한 걸음도 전진할 수 없으니, 부단히 마음을 채찍질하는 움직임이 필요해.</text:span><text:span/></text:p>
      <text:p text:style-name="P711"><text:span text:style-name="T1338">📝 핵심 요약</text:span><text:span/></text:p>
      <text:list text:style-name="WWNum38" text:continue-numbering="true">
        <text:list-item>
          <text:p text:style-name="P712"><text:span text:style-name="T1339">깨달음을 신속하게 이루기 위해서는 복덕과 지혜의 자량을 가득 채워야 함.</text:span><text:span/></text:p>
        </text:list-item>
        <text:list-item>
          <text:p text:style-name="P713"><text:span text:style-name="T1340">중생 구제를 가속화하기 위해 마음의 레이더인 신통력을 얻는 것이 필수적임.</text:span><text:span/></text:p>
        </text:list-item>
        <text:list-item>
          <text:p text:style-name="P714"><text:span text:style-name="T1341">신통과 지혜는 요행이 아니라 오직 쉬지 않고 노력하는 근수를 통해서만 성취됨.</text:span><text:span/></text:p>
        </text:list-item>
        <text:list-item>
          <text:p text:style-name="P715"><text:span text:style-name="T1342">나태함이라는 내면의 브레이크를 단호히 깨부수어야 영적 도약이 가능함.</text:span><text:span/></text:p>
        </text:list-item>
      </text:list>
      <text:p text:style-name="P716"><text:span><text:soft-page-break/></text:span><text:span/><text:span/></text:p>
      <text:p text:style-name="P717"><text:span text:style-name="T1343">38. 사마타의 고요함과 내면의 신통</text:span><text:span/></text:p>
      <text:p text:style-name="P718"><text:span text:style-name="T1344">🔑 핵심 키워드: 사마타, 마음의 고요, 신통, 거듭된 정진</text:span><text:span/></text:p>
      <text:p text:style-name="P719"><text:span text:style-name="T1345">🌊 사마타라는 고요한 마음의 상태를 이루는 것은 우리 내면의 거친 파도를 가라앉히는 아주 중요한 과정이야. 평소 우리의 마음은 온갖 생각과 걱정으로 가득 차서 흙탕물이 마구 소용돌이치는 호수와 같거든. 호수 바닥에 무엇이 있는지 보려면 먼저 바람이 멈추고 흙먼지가 가라앉아 물이 투명해져야 하듯이, 우리 마음도 사마타를 통해 온전히 고요해져야 비로소 그 깊은 본질을 들여다볼 수 있는 준비가 된단다.</text:span><text:span/></text:p>
      <text:p text:style-name="P720"><text:span text:style-name="T1346">🔮 이렇게 마음이 완벽하게 가라앉지 않으면 그 어떤 신비로운 지혜나 신통도 결코 깨어나지 않아. 사마타 없이 신통을 바라는 것은 사납게 출렁이는 바다 표면에 밤하늘의 둥근 보름달이 온전하게 비치기를 기대하는 것과 똑같거든. 파도가 너무 거세면 달빛이 사방으로 부서져서 형체를 알아볼 수 없듯이, 거친 잡념이 마음을 흔들고 있으면 우리 내면에 이미 존재하고 있는 초자연적인 지혜의 거울도 제 기능을 발휘하지 못하고 찌러진 영상만 보여줄 뿐이야.</text:span><text:span/></text:p>
      <text:p text:style-name="P721"><text:span text:style-name="T1347">🏋️ 그렇기 때문에 우리는 마음의 평정을 찾기 위해 거듭거듭 힘써 정진해야 해. 처음 명상을 시작할 때 마음이 자꾸 흔들리고 집중이 안 돼서 답답하게 느껴질 수 있을 거야. 하지만 그 순간이 바로 네 마음의 근육이 단단해지고 뇌가 한 단계 더 높은 차원으로 성장하는 아주 값진 시간이야. 매일 피아노 건반을 연습하며 손가락의 감각을 길러가듯, 끊임없이 흔들리는 마음을 부드럽게 붙잡아 중심으로 가져오는 연습을 반복할 때 비로소 깊은 고요의 문이 열리게 돼.</text:span><text:span/></text:p>
      <text:p text:style-name="P722"><text:span text:style-name="T1348">🎯 결국 이 게송은 우리에게 기초를 단단히 다지는 수행의 정석을 보여주고 있어. 화려한 결과물에만 마음이 빼앗겨 정작 가장 중요한 내면의 평화를 소홀히 하지 말라는 부처님의 따뜻한 당부이지. 맑고 고요한 마음이라는 단단한 주춧돌을 먼저 내려놓을 때, 그 위에 비로소 흔들리지 않는 지혜와 신통이라는 위대한 성불의 탑을 아름답게 쌓아 올릴 수 있단다.</text:span><text:span/></text:p>
      <text:p text:style-name="P723"><text:span text:style-name="T1349">📝 핵심 요약</text:span><text:span/></text:p>
      <text:list text:style-name="WWNum39" text:continue-numbering="true">
        <text:list-item>
          <text:p text:style-name="P724"><text:span text:style-name="T1350">사마타라는 마음의 고요를 성취하는 것이 모든 수행의 기초임</text:span><text:span/></text:p>
        </text:list-item>
        <text:list-item>
          <text:p text:style-name="P725"><text:span text:style-name="T1351">고요함이 전제되지 않으면 내면의 순수한 지혜나 신통은 결코 일어나지 않음</text:span><text:span/></text:p>
        </text:list-item>
        <text:list-item>
          <text:p text:style-name="P726"><text:span text:style-name="T1352">명상 중 겪는 어려움은 의식의 근육을 키우고 성장시키는 필연적인 과정임</text:span><text:span/></text:p>
        </text:list-item>
        <text:list-item>
          <text:p text:style-name="P727"><text:span text:style-name="T1353">거듭된 정진을 통해 마음의 파도를 가라앉히는 것이 성불로 나아가는 지름길임</text:span><text:span/></text:p>
        </text:list-item>
      </text:list>
      <text:p text:style-name="P728"><text:span><text:soft-page-break/></text:span><text:span/><text:span/></text:p>
      <text:p text:style-name="P729"><text:span text:style-name="T1354">[🟢 Online Mode | 26.06.08_14:07:53]</text:span><text:span/></text:p>
      <text:p text:style-name="P730"><text:span text:style-name="T1355">39. 올바른 토대와 효율적인 수행의 법칙</text:span><text:span/></text:p>
      <text:p text:style-name="P731"><text:span text:style-name="T1356">🔑 핵심 키워드: 사마타의 지분, 정근과 수습, 삼마지 성취 불능, 효율적인 수행</text:span><text:span/></text:p>
      <text:p text:style-name="P732"><text:span text:style-name="T1357">🧱 기초 공사가 생략된 부실 건축물</text:span><text:span/></text:p>
      <text:p text:style-name="P733"><text:span text:style-name="T1358">마음의 고요함을 뜻하는 사마타를 이루기 위한 필수적인 조건과 준비 단계들이 완전히 무너진 상태를 의미해. 비유하자면 모래 위에 화려하고 높은 빌딩을 지으려고 하는 무모한 행동과 똑같지. 건물을 단단하게 지탱해 줄 바닥 다지기와 기둥 공사라는 기초 작업을 귀찮다고 생략해 버리면, 아무리 비싼 자재를 쓰고 정성을 들여 벽을 쌓아 올려도 결국 작은 바람에 허망하게 무너져 내릴 수밖에 없어.</text:span><text:span/></text:p>
      <text:p text:style-name="P734"><text:span text:style-name="T1359">🪹 밑 빠진 독에 물 붓기와 무모한 노력</text:span><text:span/></text:p>
      <text:p text:style-name="P735"><text:span text:style-name="T1360">올바른 바탕 없이 무작정 열심히만 하는 수행은 아무리 치열하게 노력할지라도 결코 원하는 열매를 맺지 못한다는 경고야.</text:span><text:span/></text:p>
      <text:list text:style-name="WWNum40" text:continue-numbering="true">
        <text:list-item>
          <text:p text:style-name="P736"><text:span text:style-name="T1361">노력의 오류: 밤낮으로 쉬지 않고 크게 정근하며 애를 씀</text:span><text:span/></text:p>
        </text:list-item>
        <text:list-item>
          <text:p text:style-name="P737"><text:span text:style-name="T1362">허망한 결과: 수백 년이나 수천 년이라는 까마득한 세월을 바쳐도 제자리걸음</text:span><text:span/></text:p>
        </text:list-item>
        <text:list-item>
          <text:p text:style-name="P738"><text:span text:style-name="T1363">직관적 비유: 바닥에 거대한 구멍이 뚫린 커다란 항아리에 밤새도록 열심히 물을 길어 붓는 것과 같아. 채워지는 속도보다 밑으로 새어 나가는 속도가 훨씬 빠르기 때문에, 영원히 항아리를 가득 채울 수 없는 슬픈 다람쥐 쳇바퀴 돌리기 같은 상태지.</text:span><text:span/></text:p>
        </text:list-item>
      </text:list>
      <text:p text:style-name="P739"><text:span text:style-name="T1364">🏗️ 삼마지라는 궁극의 도달점</text:span><text:span/></text:p>
      <text:p text:style-name="P740"><text:span text:style-name="T1365">마음이 한 대상에 흔들림 없이 집중되어 완전한 평정을 이루는 삼마지의 상태는 철저한 인과법칙을 따라 작동해.</text:span><text:span/></text:p>
      <table:table table:style-name="ta6">
        <table:table-columns>
          <table:table-column table:style-name="co15"/>
          <table:table-column table:style-name="co16"/>
          <table:table-column table:style-name="co17"/>
        </table:table-columns>
        <table:table-header-rows>
          <table:table-row table:style-name="ro19" table:default-cell-style-name="ce56">
            <table:table-cell table:style-name="ce57">
              <text:p text:style-name="P741"><text:span text:style-name="T1366">수행의 조건</text:span><text:span/></text:p>
            </table:table-cell>
            <table:table-cell table:style-name="ce58">
              <text:p text:style-name="P742"><text:span text:style-name="T1367">준비되지 않은 상태</text:span><text:span/></text:p>
            </table:table-cell>
            <table:table-cell table:style-name="ce59">
              <text:p text:style-name="P743"><text:span text:style-name="T1368">올바르게 갖추어진 상태</text:span><text:span/></text:p>
            </table:table-cell>
          </table:table-row>
        </table:table-header-rows>
        <table:table-row table:style-name="ro20" table:default-cell-style-name="ce56">
          <table:table-cell table:style-name="ce60">
            <text:p text:style-name="P744"><text:span text:style-name="T1369">사마타의 필수 지분</text:span><text:span/></text:p>
          </table:table-cell>
          <table:table-cell table:style-name="ce61">
            <text:p text:style-name="P745"><text:span text:style-name="T1370">규범과 환경 등 기초 조건이 완전히 파괴됨</text:span><text:span/></text:p>
          </table:table-cell>
          <table:table-cell table:style-name="ce62">
            <text:p text:style-name="P746"><text:span text:style-name="T1371">올바른 이정표와 기초 체력이 완벽히 준비됨</text:span><text:span/></text:p>
          </table:table-cell>
        </table:table-row>
        <table:table-row table:style-name="ro21" table:default-cell-style-name="ce56">
          <table:table-cell table:style-name="ce63">
            <text:p text:style-name="P747"><text:span text:style-name="T1372">노력의 효율성</text:span><text:span/></text:p>
          </table:table-cell>
          <table:table-cell table:style-name="ce64">
            <text:p text:style-name="P748"><text:span text:style-name="T1373">수천 년간 맹목적으로 애써도 성취가 불가능함</text:span><text:span/></text:p>
          </table:table-cell>
          <table:table-cell table:style-name="ce65">
            <text:p text:style-name="P749"><text:span text:style-name="T1374">짧은 시간의 집중으로도 깊은 안정에 도달함</text:span><text:span/></text:p>
          </table:table-cell>
        </table:table-row>
        <table:table-row table:style-name="ro22" table:default-cell-style-name="ce56">
          <table:table-cell table:style-name="ce66">
            <text:p text:style-name="P750"><text:span text:style-name="T1375">최종적인 마음 상태</text:span><text:span/></text:p>
          </table:table-cell>
          <table:table-cell table:style-name="ce67">
            <text:p text:style-name="P751"><text:span text:style-name="T1376">번뇌의 파도에 끊임없이 흔들림</text:span><text:span/></text:p>
          </table:table-cell>
          <table:table-cell table:style-name="ce68">
            <text:p text:style-name="P752"><text:span text:style-name="T1377">거울처럼 맑고 고요한 집중을 완성함</text:span><text:span/></text:p>
          </table:table-cell>
        </table:table-row>
      </table:table>
      <text:p text:style-name="P753"><text:span text:style-name="T1378">⏳ 속도가 아닌 방향의 중요성</text:span><text:span/></text:p>
      <text:p text:style-name="P754"><text:span text:style-name="T1379">궁극적으로 무작정 땀을 흘리며 달리는 속도보다 올바른 방향을 잡는 나침반이 훨씬 중요하다는 사실을 깨달아야 해. 올바른 지분을 먼저 차근차근 갖추는 것은 돌아가는 길처럼 보이지만, 실제로는 수천 년의 허송세월을 단축해 주는 가장 빠른 지름길이지. 비유하자면 목적지 지도를 정확하게 확인하고 자동차의 내비게이션을 켠 뒤에 가속 페달을 밟아야 기름을 낭비하지 않고 원하는 곳에 단번에 도착할 수 있는 것과 완벽하게 일치하는 원리야.</text:span><text:span/></text:p>
      <text:p text:style-name="P755"><text:span text:style-name="T1380">📝 핵심 요약</text:span><text:span/></text:p>
      <text:list text:style-name="WWNum40" text:continue-numbering="true">
        <text:list-item>
          <text:p text:style-name="P756"><text:span text:style-name="T1381">사마타를 이루기 위한 도덕적 규범과 주변 환경 등의 기초 지분이 무너지면 성취가 불가능함.</text:span><text:span/></text:p>
        </text:list-item>
        <text:list-item>
          <text:p text:style-name="P757"><text:span text:style-name="T1382">올바른 바탕이 없는 맹목적인 수행은 밑 빠진 독에 물을 붓는 것처럼 허망한 노력에 그침.</text:span><text:span/></text:p>
        </text:list-item>
        <text:list-item>
          <text:p text:style-name="P758"><text:span text:style-name="T1383">아무리 오랜 세월 동안 극심하게 정근하고 애를 쓸지라도 삼마지라는 궁극의 고요함에 도달할 수 없음.</text:span><text:span/></text:p>
        </text:list-item>
        <text:list-item>
          <text:p text:style-name="P759"><text:span text:style-name="T1384">무작정 달리는 속도보다 바른 토대를 먼저 다지는 방향성이 수행의 성패를 결정짓는 핵심 열쇠임.</text:span><text:span/></text:p>
        </text:list-item>
      </text:list>
      <text:p text:style-name="P760"><text:span><text:soft-page-break/></text:span><text:span/><text:span/></text:p>
      <text:p text:style-name="P761"><text:span text:style-name="T1385">[🟢 Online Mode | 26.06.08_14:15:32]</text:span><text:span/></text:p>
      <text:p text:style-name="P762"><text:span text:style-name="T1386">40. 명상의 기초 다지기와 일념의 집중</text:span><text:span/></text:p>
      <text:p text:style-name="P763"><text:span text:style-name="T1387">🔑 핵심 키워드: 정자량품, 명상의 조건, 적절한 대상, 일념 집중</text:span><text:span/></text:p>
      <text:p text:style-name="P764"><text:span text:style-name="T1388">🎒 완벽한 여행을 위한 배낭 채우기</text:span><text:span/></text:p>
      <text:p text:style-name="P765"><text:span text:style-name="T1389">명상이라는 깊은 마음의 여행을 떠나기 전에는 반드시 필요한 준비물들을 차근차근 모아야 해. 가르침에서는 이를 정자량품이라고 부르는데, 마치 먼 길을 떠나기 전에 텐트와 비상식량, 나침반을 꼼꼼하게 챙기는 것과 같지. 아무런 준비 없이 깊은 산에 오르면 금방 지치고 길을 잃듯이, 마음을 가라앉히는 데 필요한 도덕적인 생활이나 환경 같은 기본 조건들이 먼저 채워져야 비로소 깊은 고요함 속으로 들어갈 수 있는 법이야.</text:span><text:span/></text:p>
      <text:p text:style-name="P766"><text:span text:style-name="T1390">🏗️ 흔들리지 않는 튼튼한 텐트치기</text:span><text:span/></text:p>
      <text:p text:style-name="P767"><text:span text:style-name="T1391">필요한 재료들을 잘 모았다면, 이제 그 기반 위에 단단하게 발을 붙이고 머물러야 해. 텐트를 칠 때 바닥의 못을 단단히 박아야 거센 바람이 불어도 날아가지 않는 것처럼, 명상의 여러 조건과 지분들에 온전히 나를 맡기고 머무는 과정이 필요하지. 주변의 소란스러운 상황이나 사소한 감정의 변화에 쉽게 흔들리지 않는 든든한 신뢰와 안정감을 내면 가득 채우는 단계라고 보면 돼.</text:span><text:span/></text:p>
      <text:p text:style-name="P768"><text:span text:style-name="T1392">🎯 단 하나의 과녁을 향한 조준</text:span><text:span/></text:p>
      <text:p text:style-name="P769"><text:span text:style-name="T1393">마음의 텐트가 튼튼하게 세워졌다면, 이제 방황하는 마음을 붙잡아둘 적절한 대상을 하나 선택해야 해. 사방으로 흩어지는 빛을 모아주는 볼록렌즈처럼, 우리 마음을 고결하고 순수한 하나의 대상에 부드럽게 고정하는 거지. 수많은 생각의 채널 중에서 가장 맑고 긍정적인 지혜의 주파수 하나를 골라 고정하는 것과 같아서, 이 대상을 향해 마음의 시선을 지긋이 맞추는 훈련을 시작하게 돼.</text:span><text:span/></text:p>
      <text:p text:style-name="P770"><text:span text:style-name="T1394">🕯️ 바람 없는 방 안의 촛불처럼</text:span><text:span/></text:p>
      <text:p text:style-name="P771"><text:span text:style-name="T1395">대상을 정했다면 이제는 딴생각을 피우지 않고 오직 그 하나에만 온전히 몰입하는 일념의 상태를 유지해야 해. 문을 꼭 닫은 방 안에서 미동도 하지 않고 똑바로 타오르는 촛불처럼, 마음의 불꽃이 흔들림 없이 하나의 대상을 비추게 만드는 거지. 이 맑고 집중된 상태가 이어질 때 거친 잡념들은 눈 녹듯 사라지고, 우리 마음은 본래 가지고 있던 무한한 평화와 지혜를 온전하게 드러내기 시작한단다.</text:span><text:span/></text:p>
      <text:p text:style-name="P772"><text:span text:style-name="T1396">📝 핵심 요약</text:span><text:span/></text:p>
      <text:list text:style-name="WWNum41" text:continue-numbering="true">
        <text:list-item>
          <text:p text:style-name="P773"><text:span text:style-name="T1397">명상을 시작하기 전에는 필요한 조건과 준비물인 정자량품을 철저히 갖추어야 한다.</text:span><text:span/></text:p>
        </text:list-item>
        <text:list-item>
          <text:p text:style-name="P774"><text:span text:style-name="T1398">명상의 여러 지분과 기초 위에 흔들림 없이 온전하게 머무는 안정이 필요하다.</text:span><text:span/></text:p>
        </text:list-item>
        <text:list-item>
          <text:p text:style-name="P775"><text:span text:style-name="T1399">사방으로 흩어지는 마음을 붙잡아줄 맑고 적절한 대상을 하나 선택해 조준해야 한다.</text:span><text:span/></text:p>
        </text:list-item>
        <text:list-item>
          <text:p text:style-name="P776"><text:span text:style-name="T1400">바람 없는 방의 촛불처럼 오직 한 대상에만 일념으로 집중할 때 깊은 고요함이 찾아온다.</text:span><text:span/></text:p>
        </text:list-item>
      </text:list>
      <text:p text:style-name="P777"><text:span><text:soft-page-break/></text:span><text:span/><text:span/></text:p>
      <text:p text:style-name="P778"><text:span text:style-name="T1401">[🟢 Online Mode | 26.06.08_14:09:18]</text:span><text:span/></text:p>
      <text:p text:style-name="P779"><text:span text:style-name="T1402">41. 신통력의 한계와 번뇌를 끊는 반야 지혜의 필요성</text:span><text:span/></text:p>
      <text:p text:style-name="P780"><text:span text:style-name="T1403">🔑 핵심 키워드: 사마타, 신통력 성취, 반야바라밀다, 이장의 소멸</text:span><text:span/></text:p>
      <text:p text:style-name="P781"><text:span text:style-name="T1404">🌊 사마타가 가져다주는 내면의 고요함</text:span><text:span/></text:p>
      <text:list text:style-name="WWNum42" text:continue-numbering="true">
        <text:list-item>
          <text:p text:style-name="P782"><text:span text:style-name="T1405">명상 수행자가 마음의 흔들림을 완벽하게 붙잡아 고요한 사마타 경지를 얻으면 의식은 극도로 투명해져.</text:span><text:span/></text:p>
        </text:list-item>
        <text:list-item>
          <text:p text:style-name="P783"><text:span text:style-name="T1406">흙탕물이 가득 담긴 컵을 가만히 내버려두면 시간이 지나면서 진흙은 바닥으로 가라앉고 위에는 맑은 물만 남는 것과 같지.</text:span><text:span/></text:p>
        </text:list-item>
        <text:list-item>
          <text:p text:style-name="P784"><text:span text:style-name="T1407">마음의 표면을 어지럽히던 거친 생각의 파도들이 멈추면서 내면의 거울이 본래의 깨끗한 모습을 드러내는 단계야.</text:span><text:span/></text:p>
        </text:list-item>
      </text:list>
      <text:p text:style-name="P785"><text:span text:style-name="T1408">🔮 고요함 끝에 찾아오는 신통력의 보너스</text:span><text:span/></text:p>
      <text:list text:style-name="WWNum42" text:continue-numbering="true">
        <text:list-item>
          <text:p text:style-name="P786"><text:span text:style-name="T1409">사마타를 통해 마음이 고도로 집중되면 부수적으로 신비로운 초능력인 신통력들이 자연스럽게 피어나게 돼.</text:span><text:span/></text:p>
        </text:list-item>
        <text:list-item>
          <text:p text:style-name="P787"><text:span text:style-name="T1410">평소에는 보이지 않던 아주 먼 곳의 풍경을 선명하게 당겨서 보여주는 고성능 망원렌즈를 장착하는 것과 비슷해.</text:span><text:span/></text:p>
        </text:list-item>
        <text:list-item>
          <text:p text:style-name="P788"><text:span text:style-name="T1411">남의 마음을 읽거나 보이지 않는 세계를 보는 등 의식의 확장 현상이 일어나지만, 이것은 마음이 고요해지면 따라오는 일종의 부가 기능일 뿐이야.</text:span><text:span/></text:p>
        </text:list-item>
      </text:list>
      <text:p text:style-name="P789"><text:span text:style-name="T1412">🛑 신통력으로도 깰 수 없는 이장의 벽</text:span><text:span/></text:p>
      <text:list text:style-name="WWNum42" text:continue-numbering="true">
        <text:list-item>
          <text:p text:style-name="P790"><text:span text:style-name="T1413">아무리 대단한 신통력을 얻었다 해도 우리를 윤회에 묶어두는 두 가지 장벽인 이장은 결코 사라지지 않아.</text:span><text:span/></text:p>
        </text:list-item>
        <text:list-item>
          <text:p text:style-name="P791"><text:span text:style-name="T1414">컴퓨터에 치명적인 바이러스가 걸렸을 때, 화면에 보이는 감염된 아이콘만 숨김 처리한다고 해서 바이러스 자체가 사라지는 건 아니잖아.</text:span><text:span/></text:p>
        </text:list-item>
        <text:list-item>
          <text:p text:style-name="P792"><text:span text:style-name="T1415">번뇌장과 소지장이라는 근본적인 무지와 집착의 오염원들은 단순히 마음을 진정시키는 것만으로는 뿌리 뽑을 수 없기 때문이지.</text:span><text:span/></text:p>
        </text:list-item>
      </text:list>
      <text:p text:style-name="P793"><text:span text:style-name="T1416">⚔️ 번뇌의 뿌리를 완전히 박멸하는 반야의 검</text:span><text:span/></text:p>
      <text:list text:style-name="WWNum42" text:continue-numbering="true">
        <text:list-item>
          <text:p text:style-name="P794"><text:span text:style-name="T1417">이 두 가지 거대한 영적 장애물을 완벽하게 소멸시키기 위해서는 반드시 공성을 깨닫는 반야바라밀다의 유가를 닦아야 해.</text:span><text:span/></text:p>
        </text:list-item>
        <text:list-item>
          <text:p text:style-name="P795"><text:span text:style-name="T1418">사마타가 번뇌를 잠시 잠재우는 마취제라면, 반야의 지혜는 질병의 근본 원인이 되는 암세포를 정확하게 타격하여 도려내는 정밀한 레이저 수술도구와 같아.</text:span><text:span/></text:p>
        </text:list-item>
      </text:list>
      <table:table table:style-name="ta7">
        <table:table-columns>
          <table:table-column table:style-name="co18"/>
          <table:table-column table:style-name="co19"/>
          <table:table-column table:style-name="co20"/>
        </table:table-columns>
        <table:table-header-rows>
          <table:table-row table:style-name="ro23" table:default-cell-style-name="ce69">
            <table:table-cell table:style-name="ce70">
              <text:p text:style-name="P796"><text:span text:style-name="T1419">수행 단계</text:span><text:span/></text:p>
            </table:table-cell>
            <table:table-cell table:style-name="ce71">
              <text:p text:style-name="P797"><text:span text:style-name="T1420">주요 역할</text:span><text:span/></text:p>
            </table:table-cell>
            <table:table-cell table:style-name="ce72">
              <text:p text:style-name="P798"><text:span text:style-name="T1421">일상적 비유</text:span><text:span/></text:p>
            </table:table-cell>
          </table:table-row>
        </table:table-header-rows>
        <table:table-row table:style-name="ro24" table:default-cell-style-name="ce69">
          <table:table-cell table:style-name="ce73">
            <text:p text:style-name="P799"><text:span text:style-name="T1422">사마타 명상</text:span><text:span/></text:p>
          </table:table-cell>
          <table:table-cell table:style-name="ce74">
            <text:p text:style-name="P800"><text:span text:style-name="T1423">거친 마음의 동요를 가라앉힘</text:span><text:span/></text:p>
          </table:table-cell>
          <table:table-cell table:style-name="ce75">
            <text:p text:style-name="P801"><text:span text:style-name="T1424">흙탕물의 진흙을 바닥에 가라앉힘</text:span><text:span/></text:p>
          </table:table-cell>
        </table:table-row>
        <table:table-row table:style-name="ro25" table:default-cell-style-name="ce69">
          <table:table-cell table:style-name="ce76">
            <text:p text:style-name="P802"><text:span text:style-name="T1425">반야바라밀다</text:span><text:span/></text:p>
          </table:table-cell>
          <table:table-cell table:style-name="ce77">
            <text:p text:style-name="P803"><text:span text:style-name="T1426">번뇌와 집착의 뿌리를 잘라냄</text:span><text:span/></text:p>
          </table:table-cell>
          <table:table-cell table:style-name="ce78">
            <text:p text:style-name="P804"><text:span text:style-name="T1427">가라앉은 진흙을 컵 밖으로 완전히 퍼내어 버림</text:span><text:span/></text:p>
          </table:table-cell>
        </table:table-row>
      </table:table>
      <text:p text:style-name="P805"><text:span text:style-name="T1428">📝 핵심 요약</text:span><text:span/></text:p>
      <text:list text:style-name="WWNum42" text:continue-numbering="true">
        <text:list-item>
          <text:p text:style-name="P806"><text:span text:style-name="T1429">수행자가 사마타를 성취하면 부수적인 효과로 신비로운 신통력들을 함께 얻게 됨.</text:span><text:span/></text:p>
        </text:list-item>
        <text:list-item>
          <text:p text:style-name="P807"><text:span text:style-name="T1430">신통력은 의식을 확장해주지만 우리를 묶어두는 두 가지 근본 장애인 이장을 없애지는 못함.</text:span><text:span/></text:p>
        </text:list-item>
        <text:list-item>
          <text:p text:style-name="P808"><text:span text:style-name="T1431">번뇌장과 소지장을 소멸시키기 위해서는 반드시 공성을 꿰뚫어 보는 반야바라밀다의 지혜가 필요함.</text:span><text:span/></text:p>
        </text:list-item>
        <text:list-item>
          <text:p text:style-name="P809"><text:span text:style-name="T1432">사마타로 마음을 고요히 안정시키고 반야의 지혜로 번뇌의 뿌리를 잘라내야 궁극의 해탈에 이름.</text:span><text:span/></text:p>
        </text:list-item>
      </text:list>
      <text:p text:style-name="P810"><text:span><text:soft-page-break/></text:span><text:span/><text:span/></text:p>
      <text:p text:style-name="P811"><text:span text:style-name="T1433">[🟢 Online Mode | 26.06.08_14:15:00]</text:span><text:span/></text:p>
      <text:p text:style-name="P812"><text:span text:style-name="T1434">42. 번뇌와 소지장의 타파와 지혜와 방편의 쌍운</text:span><text:span/></text:p>
      <text:p text:style-name="P813"><text:span text:style-name="T1435">🔑 핵심 키워드: 번뇌장, 소지장, 반야바라밀다, 방편, 쌍운수행</text:span><text:span/></text:p>
      <text:p text:style-name="P814"><text:span text:style-name="T1436">🛑 마음의 눈을 가리는 두 가지 거대한 암막</text:span><text:span/></text:p>
      <text:p text:style-name="P815"><text:span text:style-name="T1437">우리 마음이 본래 가진 밝은 빛을 발하지 못하는 이유는 내면에 두 가지 거대한 장애물이 앞길을 가로막고 있기 때문이야. 바로 감정을 어지럽히는 '번뇌의 장애(번뇌장)'와 진리를 올바르게 보지 못하게 만드는 '앎의 장애(소지장)'지. 번뇌장이 거친 흙탕물처럼 우리 마음을 시끄럽게 흔들어 놓는다면, 소지장은 눈앞에 낀 짙은 안개나 왜곡된 색안경처럼 세상의 참모습을 왜곡해서 보게 만들어. 깨달음이라는 탁 트인 정상에 오르려면 이 두 가지 장애물의 장벽을 반드시</text:span><text:span text:style-name="T1438"> 남김없이 걷어내야만 해.</text:span><text:span/></text:p>
      <text:p text:style-name="P816"><text:span text:style-name="T1439">💡 어둠을 꿰뚫는 가장 날카로운 빛, 반야바라밀다</text:span><text:span/></text:p>
      <text:p text:style-name="P817"><text:span text:style-name="T1440">이 완고한 장애물들을 완전히 소멸시키기 위해 우리에게 필요한 가장 강력한 무기가 바로 '반야바라밀다', 즉 초월적인 지혜의 유가야. 이것은 사물의 본질을 있는 그대로 꿰뚫어 보는 고성능 엑스레이나 아주 깊은 어둠 속에서도 길을 찾아내게 돕는 날카로운 레이저 빛과 같지. 우리가 가진 좁은 고정관념의 틀을 깨부수고 모든 존재가 상호 연결되어 공(空)하다는 거대한 진리를 깨닫게 함으로써, 오랫동안 우리를 옭아매던 무지와 착각의 사슬을 단번에 끊어내는 핵심 도구</text:span><text:span text:style-name="T1441">란다.</text:span><text:span/></text:p>
      <text:p text:style-name="P818"><text:span text:style-name="T1442">🛠️ 지혜의 빛을 안전하게 지탱하는 든든한 방어막, 방편</text:span><text:span/></text:p>
      <text:p text:style-name="P819"><text:span text:style-name="T1443">하지만 아무리 날카로운 칼날이 있어도 그것을 쥐는 튼튼한 손잡이와 다루는 기술이 없다면 제대로 쓸 수 없겠지? 지혜가 어둠을 밝히는 등불이라면, '방편(자비와 실천적 수단)'은 그 등불이 바람에 꺼지지 않도록 감싸주는 든든한 유리 갓과 같아. 남을 돕는 따뜻한 자비심과 보시, 지계 같은 구체적인 실천들이 함께 받쳐주지 않으면 지혜는 자칫 차가운 관념에 머물기 쉽거든. 방편이라는 튼튼한 바퀴가 함께 굴러갈 때 비로소 우리는 이기심의 함정에 빠지지 않고 안전</text:span><text:span text:style-name="T1444">하게 전진할 수 있어.</text:span><text:span/></text:p>
      <text:p text:style-name="P820"><text:span text:style-name="T1445">🦅 하늘을 날아오르는 두 날개의 완벽한 결합</text:span><text:span/></text:p>
      <text:p text:style-name="P821"><text:span text:style-name="T1446">결국 성자들이 우리에게 강조하는 핵심은 지혜와 방편을 어느 하나에 치우치지 않고 '항상 함께' 지극하게 닦아나가야 한다는 점이야. 광활한 하늘을 자유롭게 날아오르는 독수리에게 왼쪽 날개(지혜)와 오른쪽 날개(방편)가 모두 완벽하게 필요한 것처럼 말이지. 매일 거울을 닦아 먼지를 털어내듯 이 두 가지를 일상 속에서 끊임없이 연마할 때, 우리 마음을 가로막던 모든 번뇌와 장애는 완벽하게 소멸하고 마침내 영원한 자유와 지혜의 바다에 가닿게 된단다.</text:span><text:span/></text:p>
      <text:p text:style-name="P822"><text:span text:style-name="T1447">📝 핵심 요약</text:span><text:span/></text:p>
      <text:list text:style-name="WWNum43" text:continue-numbering="true">
        <text:list-item>
          <text:p text:style-name="P823"><text:span text:style-name="T1448">깨달음을 얻기 위해서는 감정을 어지럽히는 번뇌장과 진리를 가리는 소지장을 모두 끊어야 한다.</text:span><text:span/></text:p>
        </text:list-item>
        <text:list-item>
          <text:p text:style-name="P824"><text:span text:style-name="T1449">반야바라밀다는 거친 무지와 착각의 사슬을 끊어내고 본질을 꿰뚫어 보게 하는 초월적 지혜다.</text:span><text:span/></text:p>
        </text:list-item>
        <text:list-item>
          <text:p text:style-name="P825"><text:span text:style-name="T1450">자비와 실천을 뜻하는 방편은 지혜의 빛이 흔들리지 않도록 지탱하고 보완해 주는 도구다.</text:span><text:span/></text:p>
        </text:list-item>
        <text:list-item>
          <text:p text:style-name="P826"><text:span text:style-name="T1451">지혜와 방편을 새의 두 날개처럼 항상 결합하여 끊임없이 수행할 때 모든 장애가 완벽히 정화된다.</text:span><text:span/></text:p>
        </text:list-item>
      </text:list>
      <text:p text:style-name="P827"><text:span><text:soft-page-break/></text:span><text:span/><text:span/></text:p>
      <text:p text:style-name="P828"><text:span text:style-name="T1452">43. 방편과 반야의 거룩한 동행과 속박의 해방</text:span><text:span/></text:p>
      <text:p text:style-name="P829"><text:span text:style-name="T1453">🔑 핵심 키워드: 방편, 반야, 속박, 상호 의존, 균형</text:span><text:span/></text:p>
      <text:p text:style-name="P830"><text:span text:style-name="T1454">🦅 방편을 여윈 반야의 한계와 고립</text:span><text:span/></text:p>
      <text:p text:style-name="P831"><text:span text:style-name="T1455">지혜를 뜻하는 반야가 사람들을 구제하는 실천적 방법인 방편을 만나지 못하면, 그 지혜는 아무리 위대해도 결국 자기 안에 갇히는 속박이 되고 마단다. 이는 마치 목적지가 어디인지 아주 정확하게 알고 있는 영리한 내비게이션이 정작 바퀴나 엔진이 없는 고장 난 자동차에 탑재되어 한 발짝도 움직이지 못하는 상황과 매우 비슷해. 세상을 통찰하는 깊은 눈은 가졌지만 타인을 따뜻하게 감싸 안고 소통할 수 있는 구체적인 손발이 없기 때문에, 결국 차가운 관념의 요새 속</text:span><text:span text:style-name="T1456">에 홀로 고립되어 진정한 자유를 누리지 못하는 안타까운 상태에 이르는 거란다.</text:span><text:span/></text:p>
      <text:p text:style-name="P832"><text:span text:style-name="T1457">🏎️ 반야를 여윈 방편의 맹목성과 구속</text:span><text:span/></text:p>
      <text:p text:style-name="P833"><text:span text:style-name="T1458">반대로 따뜻한 자비심과 실천적 수단인 방편이 깊은 지혜인 반야를 갖추지 못하면, 그 선한 행동조차 도리어 자신과 타인을 얽매는 무거운 사슬이 되어버려. 아무리 힘이 좋고 속도가 빠른 최고급 스포츠카를 가졌더라도 앞을 전혀 보지 못하는 운전자가 눈을 감고 엑셀을 밟아대는 위험천만한 모습과 똑같은 이치지. 가슴속에 열정은 가득해서 이리저리 분주하게 움직이지만 세상의 본질을 꿰뚫어 보는 지혜가 결여되어 있기에, 자신이 행한 선행의 결과에 집착하게 되고 결국은 </text:span><text:span text:style-name="T1459">또 다른 집착과 업의 굴레를 만들어 스스로를 깊이 구속하게 된단다.</text:span><text:span/></text:p>
      <text:p text:style-name="P834"><text:span text:style-name="T1460">🕊️ 두 날개로 날아오르는 상호 의존의 비밀</text:span><text:span/></text:p>
      <text:p text:style-name="P835"><text:span text:style-name="T1461">그렇기 때문에 아티샤 스승님은 방편과 반야라는 이 두 가지 핵심 요소를 결코 어느 하나도 버리거나 소홀히 해서는 안 된다고 강력하게 경고하고 계셔. 둘은 서로가 서로를 완성해 주는 거대한 새의 양 날개와 같아서, 한쪽 날개만으로는 결코 끝없는 허공을 향해 온전하게 날아오를 수 없거든. 지혜라는 투명한 눈으로 길을 바라보면서 동시에 자비라는 튼튼한 다리로 대지를 딛고 걸어갈 때, 비로소 우리는 윤회의 모든 속박을 완벽하게 끊어내고 참된 해탈의 영역으로 부드</text:span><text:span text:style-name="T1462">럽게 진입할 수 있게 되는 거란다.</text:span><text:span/></text:p>
      <text:p text:style-name="P836"><text:span text:style-name="T1463">🧭 일상에서 완성하는 조화로운 실천</text:span><text:span/></text:p>
      <text:p text:style-name="P837"><text:span text:style-name="T1464">결국 우리가 삶 속에서 완성해야 할 영적 수행의 핵심은 마음속에 차가운 지혜의 등불을 켜는 동시에 손발로는 따뜻한 자비의 온기를 끊임없이 나누는 일이야. 내면으로는 세상의 모든 현상이 텅 비어 있음을 명확히 관찰하면서도, 외부로는 고통받는 이웃들을 위해 기꺼이 손을 내미는 균형 잡힌 삶을 살아가야 하지. 이처럼 눈과 발, 내비게이션과 자동차가 완벽한 한 쌍을 이루어 조화롭게 움직일 때, 우리의 모든 행동은 세속의 때가 묻지 않는 가장 청정하고 위대한 보살</text:span><text:span text:style-name="T1465">의 걸음걸이로 아름답게 피어나게 된단다.</text:span><text:span/></text:p>
      <text:p text:style-name="P838"><text:span text:style-name="T1466">📝 핵심 요약</text:span><text:span/></text:p>
      <text:list text:style-name="WWNum44" text:continue-numbering="true">
        <text:list-item>
          <text:p text:style-name="P839"><text:span text:style-name="T1467">방편이 없는 반야는 구체적인 실천 수단이 없어 관념에 갇히는 속박이 됨.</text:span><text:span/></text:p>
        </text:list-item>
        <text:list-item>
          <text:p text:style-name="P840"><text:span text:style-name="T1468">반야가 없는 방편은 본질을 보지 못해 선행의 결과에 집착하게 만드는 구속이 됨.</text:span><text:span/></text:p>
        </text:list-item>
        <text:list-item>
          <text:p text:style-name="P841"><text:span text:style-name="T1469">방편과 반야는 새의 양 날개와 같아서 어느 하나도 버리지 말고 함께 닦아야 함.</text:span><text:span/></text:p>
        </text:list-item>
        <text:list-item>
          <text:p text:style-name="P842"><text:span text:style-name="T1470">지혜로운 안목과 자비로운 실천이 완벽한 균형을 이룰 때 비로소 윤회의 속박에서 벗어남.</text:span><text:span/></text:p>
        </text:list-item>
      </text:list>
      <text:p text:style-name="P843"><text:span><text:soft-page-break/></text:span><text:span/><text:span/></text:p>
      <text:p text:style-name="P844"><text:span text:style-name="T1471">44. 방편과 반야의 명확한 구별과 의심 타파</text:span><text:span/></text:p>
      <text:p text:style-name="P845"><text:span text:style-name="T1472">🔑 핵심 키워드: 방편, 반야, 의심 소멸, 바른 차별, 대승 수행</text:span><text:span/></text:p>
      <text:p text:style-name="P846"><text:span text:style-name="T1473">🧭 올바른 길을 찾기 위한 첫걸음, 의심의 제거</text:span><text:span/></text:p>
      <text:p text:style-name="P847"><text:span text:style-name="T1474">불교 수행의 깊은 차원으로 나아가기 전에 많은 수행자가 가장 먼저 부딪히는 벽이 바로 '도대체 반야가 무엇이고, 방편이 무엇인가?'에 대한 혼란이야. 아티샤 스승은 이 게송을 통해 수행자의 내면에 자리 잡은 잘못된 이해와 안개 같은 의심들을 완전히 걷어내 주려고 해. 목적지를 모른 채 무작정 걷다 보면 길을 잃기 쉽듯이, 개념의 정확한 경계를 아는 것이야말로 방편과 반야라는 대승의 두 날개를 완벽하게 다루기 위한 필수적인 첫걸음이란다.</text:span><text:span/></text:p>
      <text:p text:style-name="P848"><text:span text:style-name="T1475">🛠️ 움직이는 힘과 조종하는 키, 방편과 반야의 비유</text:span><text:span/></text:p>
      <text:p text:style-name="P849"><text:span text:style-name="T1476">쉽게 비유하자면, 방편은 목적지를 향해 힘차게 나아가는 자동차의 강력한 엔진과 같고, 반야는 올바른 방향을 잡아주는 핸들이나 내비게이션과 같아. 아무리 엔진이 훌륭해도 핸들이 고장 나면 낭떠러지로 떨어지고, 반대로 핸들이 아무리 멀쩡해도 엔진이 없으면 단 한 걸음도 앞으로 나아갈 수 없지. 이처럼 두 개념은 서로 독립된 것이 아니라, 완전한 깨달음이라는 하나의 목표를 위해 톱니바퀴처럼 정밀하게 맞물려 돌아가는 상호 보완적인 존재야.</text:span><text:span/></text:p>
      <text:p text:style-name="P850"><text:span text:style-name="T1477">⚖️ 한쪽으로 치우치지 않는 바른 차별의 지혜</text:span><text:span/></text:p>
      <text:p text:style-name="P851"><text:span text:style-name="T1478">많은 사람이 지혜만 있으면 충분하다거나, 혹은 좋은 행동만 많이 하면 된다는 극단적인 오해에 빠지곤 해. 하지만 아티샤 스승은 이 둘의 역할과 성격을 명확하게 구별해서 가르쳐 주지. 방편은 자비심을 바탕으로 중생을 구제하는 온갖 실천적 행위들을 말하고, 반야는 세상의 본질이 텅 비어 있음을 꿰뚫어 보는 철학적 통찰을 뜻해. 이 둘의 차이를 명확히 아는 순간, 우리는 균형을 잃지 않는 단단한 수행의 중심을 잡을 수 있게 된단다.</text:span><text:span/></text:p>
      <text:p text:style-name="P852"><text:span text:style-name="T1479">💎 안개를 걷어내고 피어나는 확신</text:span><text:span/></text:p>
      <text:p text:style-name="P853"><text:span text:style-name="T1480">개념의 혼란과 의심이 완전히 사라지면, 수행자의 마음에는 흔들리지 않는 단단한 확신이 피어나게 돼. 가상현실 속에서 길을 헤매다가 전원을 끄고 현실의 맑은 하늘을 보았을 때 느껴지는 명쾌함과 비슷하지. 방편과 반야의 바른 경계를 눈으로 보듯 선명하게 이해할 때, 우리는 비로소 대승 수행의 정수를 온전히 맛보며 주저 없이 깨달음의 길을 향해 성큼성큼 걸어갈 수 있게 돼.</text:span><text:span/></text:p>
      <text:p text:style-name="P854"><text:span text:style-name="T1481">📝 핵심 요약</text:span><text:span/></text:p>
      <text:list text:style-name="WWNum45" text:continue-numbering="true">
        <text:list-item>
          <text:p text:style-name="P855"><text:span text:style-name="T1482">수행자가 대승의 길에서 가장 먼저 해결해야 할 과제는 방편과 반야에 대한 내면의 의심과 오해를 없애는 거야.</text:span><text:span/></text:p>
        </text:list-item>
        <text:list-item>
          <text:p text:style-name="P856"><text:span text:style-name="T1483">방편은 추진력을 주는 자동차 엔진과 같고, 반야는 방향을 잡아주는 핸들과 같아서 둘은 결코 분리될 수 없어.</text:span><text:span/></text:p>
        </text:list-item>
        <text:list-item>
          <text:p text:style-name="P857"><text:span text:style-name="T1484">방편은 중생을 구제하는 자비의 실천을 뜻하며, 반야는 공성을 꿰뚫어 보는 지혜를 의미하므로 이 둘의 역할을 명확히 차별하여 이해해야 해.</text:span><text:span/></text:p>
        </text:list-item>
        <text:list-item>
          <text:p text:style-name="P858"><text:span text:style-name="T1485">두 개념의 경계를 선명하게 깨달을 때 비로소 치우침 없는 바른 수행을 통해 깨달음의 길로 흔들림 없이 나아갈 수 있어.</text:span><text:span/></text:p>
        </text:list-item>
      </text:list>
      <text:p text:style-name="P859"><text:span><text:soft-page-break/></text:span><text:span/><text:span/></text:p>
      <text:p text:style-name="P860"><text:span text:style-name="T1486">[🟢 Online Mode | 26.06.08_14:09:38]</text:span><text:span/></text:p>
      <text:p text:style-name="P861"><text:span text:style-name="T1487">45. 지혜를 제외한 모든 선행의 이름, 방편</text:span><text:span/></text:p>
      <text:p text:style-name="P862"><text:span text:style-name="T1488">🔑 핵심 키워드: 반야바라밀다, 보시바라밀다, 선한 자량, 방편, 제불의 가르침</text:span><text:span/></text:p>
      <text:p text:style-name="P863"><text:span text:style-name="T1489">🌾 깨달음의 길을 가꾸는 선한 자량의 축적</text:span><text:span/></text:p>
      <text:p text:style-name="P864"><text:span text:style-name="T1490">우리가 깨달음을 향해 나아갈 때 쌓아야 하는 모든 선한 공덕과 자질들을 불교에서는 자량이라고 불러. 남에게 베푸는 보시바라밀다를 시작으로 도덕적인 삶을 사는 지계, 인내하는 인욕 등 다양한 선행들이 여기에 포함되지. 이것은 마치 비행기를 타고 먼 태평양을 건너기 위해 미리 비행기 동체를 튼튼하게 조립하고 승객들이 먹을 맛있는 기내식과 비상약품을 가득 실어두는 준비 과정과 똑같아. 목적지에 안전하게 도착하기 위해 반드시 채워야 하는 풍요로운 양식인 셈이지.</text:span><text:span/></text:p>
      <text:p text:style-name="P865"><text:span text:style-name="T1491">🛠️ 제불이 정의한 방편이라는 움직임의 도구</text:span><text:span/></text:p>
      <text:p text:style-name="P866"><text:span text:style-name="T1492">부처님들께서는 이처럼 반야바라밀다를 제외한 모든 선한 공덕의 무리를 한마디로 방편이라고 정의하셨어. 방편은 목적지에 도달하기 위해 사용하는 구체적이고 실천적인 수단이나 도구를 의미해. 자동차로 비유하자면 바퀴를 굴리는 강력한 엔진, 차체를 지탱하는 단단한 나사, 그리고 목적지까지 지치지 않고 달릴 수 있게 만드는 무한한 연료와 같지. 아무리 가고 싶은 마음이 간절해도 실제로 움직여 줄 차체와 연료라는 방편이 없다면 우리는 단 한 걸음도 앞으로 나아갈 수 </text:span><text:span text:style-name="T1493">없어.</text:span><text:span/></text:p>
      <text:p text:style-name="P867"><text:span text:style-name="T1494">🧭 방향을 잡아주는 눈과 달리는 발의 조화</text:span><text:span/></text:p>
      <text:p text:style-name="P868"><text:span text:style-name="T1495">그렇다면 왜 수많은 선행 중에서 오직 반야바라밀다, 즉 지혜만을 쏙 빼놓고 방편이라고 불렀을까? 지혜와 방편은 새의 양 날개나 자동차의 내비게이션과 바퀴처럼 서로 완벽하게 다른 역할을 하면서도 하나로 맞물려야 하기 때문이야. 보시나 지계 같은 방편들이 열심히 달리는 튼튼한 발의 역할을 담당한다면, 반야는 그 발이 엉뚱한 낭떠러지로 떨어지지 않도록 올바른 길을 찾아내는 선명한 눈의 역할을 하기 때문이지. 눈이 아무리 밝아도 발이 움직이지 않으면 제자리이고,</text:span><text:span text:style-name="T1496"> 발이 아무리 빨라도 눈을 감고 달리면 사고가 나는 것과 같아.</text:span><text:span/></text:p>
      <text:p text:style-name="P869"><text:span text:style-name="T1497">💎 온전한 깨달음을 완성하는 이분법의 비밀</text:span><text:span/></text:p>
      <text:p text:style-name="P870"><text:span text:style-name="T1498">결국 부처님들이 지혜를 제외한 모든 공덕을 방편이라 선언하신 이유는, 수행자들이 실천적인 행동의 중요성을 결코 과소평가하지 않도록 하기 위함이야. 깊은 명상 속에서 진리를 깨닫는 지혜도 너무나 소중하지만, 세상 속에서 직접 자비를 베풀고 선행을 실천하는 방편의 다리가 튼튼해야만 비로소 완전한 부처의 상태에 도달할 수 있거든. 이 거대한 두 가지 축이 내 마음속에서 완벽한 균형을 이룰 때, 비로소 막힘없는 깨달음의 대여정이 완성되는 거란다.</text:span><text:span/></text:p>
      <text:p text:style-name="P871"><text:span text:style-name="T1499">📝 핵심 요약</text:span><text:span/></text:p>
      <text:list text:style-name="WWNum46" text:continue-numbering="true">
        <text:list-item>
          <text:p text:style-name="P872"><text:span text:style-name="T1500">반야바라밀다를 제외한 보시 등의 모든 선한 공덕과 자량은 부처님들에 의해 방편으로 정의된다.</text:span><text:span/></text:p>
        </text:list-item>
        <text:list-item>
          <text:p text:style-name="P873"><text:span text:style-name="T1501">방편은 목적지에 도달하기 위해 필요한 구체적이고 실천적인 수단이자 자동차의 연료와 같은 동력이다.</text:span><text:span/></text:p>
        </text:list-item>
        <text:list-item>
          <text:p text:style-name="P874"><text:span text:style-name="T1502">지혜가 올바른 길을 찾아내는 눈의 역할이라면, 방편은 그 길을 향해 실제로 걸어가는 발의 역할을 한다.</text:span><text:span/></text:p>
        </text:list-item>
        <text:list-item>
          <text:p text:style-name="P875"><text:span text:style-name="T1503">온전한 깨달음을 성취하기 위해서는 눈에 보이는 실천적 방편과 내면의 지혜가 균형 있게 결합해야 한다.</text:span><text:span/></text:p>
        </text:list-item>
      </text:list>
      <text:p text:style-name="P876"><text:span><text:soft-page-break/></text:span><text:span/><text:span/></text:p>
      <text:p text:style-name="P877"><text:span text:style-name="T1504">[🟢 Online Mode | 26.06.08_14:15:22]</text:span><text:span/></text:p>
      <text:p text:style-name="P878"><text:span text:style-name="T1505">46. 방편과 지혜의 쌍수와 신속한 성불</text:span><text:span/></text:p>
      <text:p text:style-name="P879"><text:span text:style-name="T1506">🔑 핵심 키워드: 방편 수습, 반야 근수, 무아 독수 불가, 신속한 보리 증득</text:span><text:span/></text:p>
      <text:p text:style-name="P880"><text:span text:style-name="T1507">🦅 최고의 깨달음인 원만보리를 신속하게 성취하려면 방편과 지혜라는 두 가지 기둥이 완벽하게 맞물려야 해. 이는 마치 거대한 독수리가 저 높은 하늘을 자유롭게 날아가기 위해서 왼쪽 날개와 오른쪽 날개를 동시에 힘차게 퍼덕여야 하는 것과 같지. 한쪽 날개만 아무리 튼튼하고 거대해도 나머지 한쪽이 부실하거나 멈춰 있다면 결국 제자리를 맴돌다 추락할 수밖에 없는 이치와 똑같아. 밀교의 수행도 중생을 구제하겠다는 자비와 방편의 힘을 든든한 바탕으로 삼을 때 비로소</text:span><text:span text:style-name="T1508"> 지혜가 온전한 동력을 얻게 되는 거야.</text:span><text:span/></text:p>
      <text:p text:style-name="P881"><text:span text:style-name="T1509">🚗 많은 사람들이 단순히 자아가 없다는 무아의 진리나 공성 하나만을 깊이 명상하면 모든 깨달음이 저절로 완성될 것이라고 오해하곤 해. 하지만 무아 하나만을 고집스럽게 닦는 것은 마치 자동차를 조립할 때 엔진은 최고급으로 아주 정밀하게 만들어 놓았는데 정작 바퀴나 핸들 같은 구체적인 구동 장치를 전혀 달지 않은 것과 같아. 아무리 훌륭한 이론과 핵심 부품을 가졌어도 도로 위를 실제로 굴러가게 만드는 실질적인 방편이 없다면 목적지까지 단 한 걸음도 전진할 수</text:span><text:span text:style-name="T1510"> 없는 법이지.</text:span><text:span/></text:p>
      <text:p text:style-name="P882"><text:span text:style-name="T1511">📱 방편을 열심히 닦아서 다져진 강력한 복덕의 힘 위에서 반야의 지혜를 부지런히 닦아 나갈 때, 비로소 깨달음의 속도는 상상을 초월할 정도로 빨라지게 돼. 비유하자면 최첨단 스마트폰에 완벽한 하드웨어가 갖춰진 상태에서, 그 기기를 완벽하게 구동해 줄 최적의 운영체제와 소프트웨어가 동시에 설치되는 장면과 같아. 하드웨어와 소프트웨어가 서로의 성능을 극대화하며 완벽하게 호환될 때 기기가 가장 빠르고 부드럽게 작동하듯, 방편과 지혜의 쌍수는 우리를 초고속 성불</text:span><text:span text:style-name="T1512">의 길로 안내하는 가장 강력한 시너지 효과를 만들어내.</text:span><text:span/></text:p>
      <text:p text:style-name="P883"><text:span text:style-name="T1513">🔑 결국 이 게송이 우리에게 전하는 핵심은 어느 한쪽으로 치우치지 않는 온전한 균형과 통합의 지혜야. 중생을 향한 뜨거운 자비심과 구체적인 행동인 방편, 그리고 세상의 본질을 뚫어보는 차가운 이성인 반야가 내면에서 하나로 용해되어야만 해. 이 두 가지가 완벽한 조화를 이룰 때 비로소 우리는 사후의 혼란이나 윤회의 사슬에 구속되지 않고, 지금 이 순간 가장 빠르고 당당하게 부처의 경지에 도달할 수 있는 영광스러운 열쇠를 거머쥐게 되는 거야.</text:span><text:span/></text:p>
      <text:p text:style-name="P884"><text:span text:style-name="T1514">📝 핵심 요약</text:span><text:span/></text:p>
      <text:list text:style-name="WWNum47" text:continue-numbering="true">
        <text:list-item>
          <text:p text:style-name="P885"><text:span text:style-name="T1515">신속한 원만보리의 성취를 위해서는 자비의 방편과 반야의 지혜가 반드시 동시에 수습되어야 한다.</text:span><text:span/></text:p>
        </text:list-item>
        <text:list-item>
          <text:p text:style-name="P886"><text:span text:style-name="T1516">무아의 진리나 공성 하나만을 독단적으로 닦아서는 결코 궁극의 깨달음에 도달할 수 없다.</text:span><text:span/></text:p>
        </text:list-item>
        <text:list-item>
          <text:p text:style-name="P887"><text:span text:style-name="T1517">방편과 지혜의 결합은 새의 두 날개나 스마트폰의 하드웨어와 소프트웨어처럼 상호 보완적인 시너지를 낸다.</text:span><text:span/></text:p>
        </text:list-item>
        <text:list-item>
          <text:p text:style-name="P888"><text:span text:style-name="T1518">균형 잡힌 통합 수행을 통해서만 윤회의 고리를 끊고 가장 빠른 성불의 길로 나아갈 수 있다.</text:span><text:span/></text:p>
        </text:list-item>
      </text:list>
      <text:p text:style-name="P889"><text:span><text:soft-page-break/></text:span><text:span/><text:span/></text:p>
      <text:p text:style-name="P890"><text:span text:style-name="T1519">[🟢 Online Mode | 26.06.08_14:20:00]</text:span><text:span/></text:p>
      <text:p text:style-name="P891"><text:span text:style-name="T1520">47. 본래 텅 빈 진리를 께뚫어 보는 참된 지혜, 반야</text:span><text:span/></text:p>
      <text:p text:style-name="P892"><text:span text:style-name="T1521">🔑 핵심 키워드: 온·계·처, 무생(無生), 자성공(自性空), 반야(般若)</text:span><text:span/></text:p>
      <text:p text:style-name="P893"><text:span text:style-name="T1522">🧱 나를 구성하는 세상의 레고 블록, 온·계·처</text:span><text:span/></text:p>
      <text:p text:style-name="P894"><text:span text:style-name="T1523">우리가 '나'라고 믿고 있는 존재와 매일 경험하는 외부 세계는 사실 온(오온), 계(18계), 처(12처)라는 정교한 요소들의 집합체야. 우리의 신체, 감정, 생각, 그리고 감각 기관과 그 대상들이 촘촘하게 맞물려 돌아가는 거대한 시스템이지. 마치 수많은 부품이 결합해 조립된 최첨단 컴퓨터나 수만 개의 레고 블록으로 쌓아 올린 화려한 성벽과 같다고 보면 돼. 우리는 보통 이 결합물 전체를 보고 '나'라는 단단하고 영원한 실체가 진짜 존재한다는 착각에 빠지</text:span><text:span text:style-name="T1524">곤 하지.</text:span><text:span/></text:p>
      <text:p text:style-name="P895"><text:span text:style-name="T1525">🎬 태어난 적도 사라진 적도 없는 무생의 비밀</text:span><text:span/></text:p>
      <table:table table:style-name="ta8">
        <table:table-columns>
          <table:table-column table:style-name="co21"/>
          <table:table-column table:style-name="co22"/>
          <table:table-column table:style-name="co23"/>
        </table:table-columns>
        <table:table-header-rows>
          <table:table-row table:style-name="ro26" table:default-cell-style-name="ce79">
            <table:table-cell table:style-name="ce80">
              <text:p text:style-name="P896"><text:span text:style-name="T1526">구분</text:span><text:span/></text:p>
            </table:table-cell>
            <table:table-cell table:style-name="ce81">
              <text:p text:style-name="P897"><text:span text:style-name="T1527">범속한 착각</text:span><text:span/></text:p>
            </table:table-cell>
            <table:table-cell table:style-name="ce82">
              <text:p text:style-name="P898"><text:span text:style-name="T1528">반야의 통찰 (무생)</text:span><text:span/></text:p>
            </table:table-cell>
          </table:table-row>
        </table:table-header-rows>
        <table:table-row table:style-name="ro27" table:default-cell-style-name="ce79">
          <table:table-cell table:style-name="ce83">
            <text:p text:style-name="P899"><text:span text:style-name="T1529">존재의 발생</text:span><text:span/></text:p>
          </table:table-cell>
          <table:table-cell table:style-name="ce84">
            <text:p text:style-name="P900"><text:span text:style-name="T1530">외부의 조건들과 독립된 단단한 실체가 스스로 태어남</text:span><text:span/></text:p>
          </table:table-cell>
          <table:table-cell table:style-name="ce85">
            <text:p text:style-name="P901"><text:span text:style-name="T1531">인연에 의해 잠시 나타난 현상일 뿐, 독립된 시작이 없음</text:span><text:span/></text:p>
          </table:table-cell>
        </table:table-row>
        <table:table-row table:style-name="ro28" table:default-cell-style-name="ce79">
          <table:table-cell table:style-name="ce86">
            <text:p text:style-name="P902"><text:span text:style-name="T1532">비유적 이해</text:span><text:span/></text:p>
          </table:table-cell>
          <table:table-cell table:style-name="ce87">
            <text:p text:style-name="P903"><text:span text:style-name="T1533">스크린 위의 주인공이 실제로 살아서 움직인다고 믿음</text:span><text:span/></text:p>
          </table:table-cell>
          <table:table-cell table:style-name="ce88">
            <text:p text:style-name="P904"><text:span text:style-name="T1534">빔프로젝터의 빛과 필름이 만나 잠시 일어난 환영임을 앎</text:span><text:span/></text:p>
          </table:table-cell>
        </table:table-row>
      </table:table>
      <text:p text:style-name="P905"><text:span text:style-name="T1535">반야의 눈으로 이 세상의 조립품들을 깊이 들여다보면, 이 요소들이 스스로 고정된 성질을 가지고 처음부터 태어난 적이 없다는 무생(無生)의 진실을 깨닫게 돼. 극장에서 영화 속 주인공이 울고 웃으며 파란만장한 삶을 살아가지만, 사실 그것은 스크린 위에 비친 빛의 일렁임일 뿐 실제로 태어난 사람이 단 한 명도 없는 것과 똑같은 이치란다.</text:span><text:span/></text:p>
      <text:p text:style-name="P906"><text:span text:style-name="T1536">🫧 속이 텅 비어 있는 비누방울 같은 자성공</text:span><text:span/></text:p>
      <text:p text:style-name="P907"><text:span text:style-name="T1537">이처럼 모든 현상이 인연에 의해 잠시 뭉쳤다 흩어지는 흐름일 뿐, 그 중심에는 '나라고 할 만한 고유한 성질'이 전혀 없다는 것을 자성공(自性空)이라고 불러. 알맹이가 꽉 찬 단단한 당구공인 줄 알았는데, 껍질을 까고 들어가 보니 안이 텅 비어 있는 비누방울이나 아무리 까도 알맹이가 나오지 않는 양파와 같은 상태를 뜻하지. 모든 물질과 마음의 요소들이 겉으로는 그럴듯하게 존재해 보이지만, 실상은 조건에 의지해 일어난 환상 같은 공(空)한 상태임을 명확히 </text:span><text:span text:style-name="T1538">인지하는 단계야.</text:span><text:span/></text:p>
      <text:p text:style-name="P908"><text:span text:style-name="T1539">👓 세상의 착시를 걷어내는 고성능 엑스레이, 반야</text:span><text:span/></text:p>
      <text:p text:style-name="P909"><text:span text:style-name="T1540">겉으로 보이는 화려한 환상에 속지 않고, 존재의 본질이 본래 텅 비어 있다는 이 위대한 진리를 있는 그대로 명확하게 아는 마음의 능력을 바로 반야(般若), 즉 지혜라고 부르는 거야. 눈앞에 펼쳐진 화려한 3D 홀로그램 영상을 보고 그것이 진짜 물체인 줄 알고 만지려 할 때, 특수 안경을 쓰고 '아, 이건 단지 빛의 간섭 현상일 뿐이구나' 하고 단번에 꿰뚫어 보는 것과 같아. 이 반야의 지혜를 갖추어야만 우리는 비로소 허망한 집착과 두려움에서 완전히 벗어나</text:span><text:span text:style-name="T1541"> 궁극의 평온을 얻을 수 있게 돼.</text:span><text:span/></text:p>
      <text:p text:style-name="P910"><text:span text:style-name="T1542">📝 핵심 요약</text:span><text:span/></text:p>
      <text:list text:style-name="WWNum48" text:continue-numbering="true">
        <text:list-item>
          <text:p text:style-name="P911"><text:span text:style-name="T1543">우리를 구성하는 물질과 마음의 요소인 온·계·처는 독립된 실체로 태어난 적이 없는 무생의 존재임.</text:span><text:span/></text:p>
        </text:list-item>
        <text:list-item>
          <text:p text:style-name="P912"><text:span text:style-name="T1544">모든 현상은 인연에 따라 잠시 나타난 환영일 뿐, 고유한 알맹이가 없는 자성공의 상태임.</text:span><text:span/></text:p>
        </text:list-item>
        <text:list-item>
          <text:p text:style-name="P913"><text:span text:style-name="T1545">겉모습의 착시에 속지 않고 본질인 공성을 명확히 아는 마음의 눈이 바로 반야(지혜)임.</text:span><text:span/></text:p>
        </text:list-item>
        <text:list-item>
          <text:p text:style-name="P914"><text:span text:style-name="T1546">이 반야의 지혜를 통해 실체 없는 환상에 대한 집착을 끊고 궁극의 해탈을 성취하게 됨.</text:span><text:span/></text:p>
        </text:list-item>
      </text:list>
      <text:p text:style-name="P915"><text:span><text:soft-page-break/></text:span><text:span/><text:span/></text:p>
      <text:p text:style-name="P916"><text:span text:style-name="T1547">48. 존재와 비존재를 넘어선 무생의 지혜</text:span><text:span/></text:p>
      <text:p text:style-name="P917"><text:span text:style-name="T1548">🔑 핵심 키워드: 파유무생인, 허공 꽃, 자성, 연기</text:span><text:span/></text:p>
      <text:p text:style-name="P918"><text:span text:style-name="T1549">🥚 이미 존재하는 것은 다시 태어날 필요가 없어. 사물이 원래부터 완벽하게 존재하고 있다면 그것이 새롭게 생겨난다는 말 자체가 성립하지 않거든. 이미 다 구워져서 식탁 위에 놓인 식빵을 오븐에 넣고 처음부터 다시 구울 수 없는 것처럼 말이야. 이미 가득 채워진 컵에 물을 더 부어봐야 넘칠 뿐이지, 그 컵 자체가 새로 생겨나는 게 아닌 것과 똑같은 이치라고 보면 돼.</text:span><text:span/></text:p>
      <text:p text:style-name="P919"><text:span text:style-name="T1550">🌸 반대로 아예 존재하지 않는 것이 새롭게 생겨나는 것도 불가능해. 게송에서는 이를 허공 꽃이라는 비유로 설명하는데, 애초에 실체가 없는 텅 빈 허공에서 갑자기 진짜 장미꽃이 피어날 수는 없잖아? 아무리 넓은 땅이 있어도 씨앗 자체가 존재하지 않는다면 그 어디에서도 푸른 싹이 돋아날 수 없는 이치와 같아. 원인과 바탕이 아예 없는 제로의 상태에서는 그 어떤 결과물도 스스로 나타날 수 없으니까.</text:span><text:span/></text:p>
      <text:p text:style-name="P920"><text:span text:style-name="T1551">⚖️ 그렇다면 있는 상태와 없는 상태가 동시에 만나서 사물이 생겨나는 걸까? 이것 역시 엄청난 모순에 빠지게 돼. 있는 것의 오류와 없는 것의 오류를 동시에 떠안게 되거든. 뜨거운 얼음물이나 살아있으면서 동시에 죽어있는 생명체라는 말이 세상에 존재할 수 없는 것처럼, 서로 정반대되는 성질이 합쳐져서 사물의 탄생을 설명할 수는 없어. 자석의 같은 극끼리 밀어내듯 결코 양립할 수 없는 구조적인 모순일 뿐이지.</text:span><text:span/></text:p>
      <text:p text:style-name="P921"><text:span text:style-name="T1552">🌌 결국 이 가르침이 보여주는 최종 결론은 모든 사물이 스스로 독립된 성품을 가지고 태어나는 게 아니라는 사실이야. 사물은 고정된 실체로서 뚝딱 생겨나는 게 아니라, 수많은 조건과 인연이 서로 의지하며 나타나는 연기적인 존재일 뿐이지. 벽에 비친 그림자가 스스로 존재하는 게 아니라 손과 빛이 만나 잠시 나타나는 것처럼, 세상 모든 현상은 독립적인 발생이 아니라 정교한 관계 속에서 빚어지는 아름다운 흐름이야.</text:span><text:span/></text:p>
      <text:p text:style-name="P922"><text:span text:style-name="T1553">📝 핵심 요약</text:span><text:span/></text:p>
      <text:list text:style-name="WWNum49" text:continue-numbering="true">
        <text:list-item>
          <text:p text:style-name="P923"><text:span text:style-name="T1554">이미 존재하는 사물은 다시 새롭게 생겨날 필요가 없음</text:span><text:span/></text:p>
        </text:list-item>
        <text:list-item>
          <text:p text:style-name="P924"><text:span text:style-name="T1555">아예 존재하지 않는 것은 허공 꽃처럼 발생할 수 있는 원인과 바탕이 없음</text:span><text:span/></text:p>
        </text:list-item>
        <text:list-item>
          <text:p text:style-name="P925"><text:span text:style-name="T1556">존재와 비존재가 동시에 합쳐져서 사물이 생겨난다는 것도 논리적 모순임</text:span><text:span/></text:p>
        </text:list-item>
        <text:list-item>
          <text:p text:style-name="P926"><text:span text:style-name="T1557">모든 현상은 독립적으로 발생하는 자성이 없으며 인연에 의해 나타나는 연기적인 존재임</text:span><text:span/></text:p>
        </text:list-item>
      </text:list>
      <text:p text:style-name="P927"><text:span><text:soft-page-break/></text:span><text:span/><text:span/></text:p>
      <text:p text:style-name="P928"><text:span text:style-name="T1558">[🟢 Online Mode | 26.06.08_14:12:35]</text:span><text:span/></text:p>
      <text:p text:style-name="P929"><text:span text:style-name="T1559">49. 금강설인과 존재의 본질적 자성 없음</text:span><text:span/></text:p>
      <text:p text:style-name="P930"><text:span text:style-name="T1560">🔑 핵심 키워드: 금강설인, 자생 불가, 타생 불가, 무인생 불가, 자성 없음</text:span><text:span/></text:p>
      <text:p text:style-name="P931"><text:span text:style-name="T1561">🪞 스스로를 낳을 수 없는 존재의 한계</text:span><text:span/></text:p>
      <text:p text:style-name="P932"><text:span text:style-name="T1562">어떤 사물이나 현상도 결코 자기 자신으로부터 스스로 태어날 수 없어. 비유하자면 이미 세상에 번듯하게 태어나 있는 네가 스스로를 다시 임신해서 쌍둥이처럼 낳을 수 없는 것과 똑같은 이치지. 이미 완벽하게 존재하는 것은 새로 태어날 필요가 없고, 아직 존재하지 않는 상태라면 스스로를 만들어낼 힘이 원천적으로 없기 때문이야. 원인과 결과는 동시일 수 없기에, 자기가 자기를 낳는다는 것은 영원히 풀릴 수 없는 논리적 모순일 뿐이야.</text:span><text:span/></text:p>
      <text:p text:style-name="P933"><text:span text:style-name="T1563">🏜️ 무관한 남에게서 솟아날 수 없는 결과</text:span><text:span/></text:p>
      <text:p text:style-name="P934"><text:span text:style-name="T1564">그렇다면 나와 완전히 무관한 다른 무언가가 나를 독립적으로 만들어냈을까? 그것도 불가능해. 비유하자면 메마른 모래더미를 아무리 강하게 쥐어짜도 달콤하고 고소한 참기름이 결코 흘러나올 수 없는 것과 같지. 원인과 결과 사이에 보이지 않는 긴밀한 연결고리인 인연이 없다면, 세상의 모든 무관한 것들이 아무렇게나 서로를 만들어내는 대혼란이 찾아올 거야. 돌멩이에서 아기 새가 태어나고 물속에서 불꽃이 피어나는 황당한 일이 없는 이유는, 독립된 타자가 독립된 결과를</text:span><text:span text:style-name="T1565"> 홀로 낳을 수 없기 때문이지.</text:span><text:span/></text:p>
      <text:p text:style-name="P935"><text:span text:style-name="T1566">🦯 장님 둘의 동행과 허공의 환영</text:span><text:span/></text:p>
      <text:p text:style-name="P936"><text:span text:style-name="T1567">자신과 타자가 힘을 합치거나, 혹은 아예 아무런 원인도 없이 우연히 태어나는 것도 불가능의 영역이야.</text:span><text:span/></text:p>
      <text:list text:style-name="WWNum50" text:continue-numbering="true">
        <text:list-item>
          <text:p text:style-name="P937"><text:span text:style-name="T1568">공동 발생의 모순: 자기 발생과 타자 발생이라는 두 가지 오류를 단순히 합쳐놓은 것에 불과해. 마치 눈이 보이지 않는 장님 두 사람이 서로의 지팡이를 붙잡는다고 해서 한 번도 가보지 못한 낯선 길을 정확하게 찾아갈 수 없는 것과 같지.</text:span><text:span/></text:p>
        </text:list-item>
        <text:list-item>
          <text:p text:style-name="P938"><text:span text:style-name="T1569">무인 발생의 모순: 아무런 원인도 없이 무언가 홀연히 생겨난다는 생각은 차가운 겨울 허공에서 갑자기 아름다운 꽃이 피어나기를 바라는 것과 같아. 세상의 모든 일에는 반드시 마땅한 이유와 조건이 필요한 법이니까.</text:span><text:span/></text:p>
        </text:list-item>
      </text:list>
      <text:p text:style-name="P939"><text:span text:style-name="T1570">🕸️ 그물망으로 연결된 투명한 세계</text:span><text:span/></text:p>
      <text:p text:style-name="P940"><text:span text:style-name="T1571">이처럼 네 가지 모든 방향으로 원인을 철저하게 추적해 보면, 결국 세상의 그 어떤 사물도 독립적이고 고정불변한 자신만의 알맹이를 가지고 있지 않다는 위대한 결론에 도달하게 돼.</text:span><text:span/></text:p>
      <table:table table:style-name="ta9">
        <table:table-columns>
          <table:table-column table:style-name="co24"/>
          <table:table-column table:style-name="co25"/>
          <table:table-column table:style-name="co26"/>
        </table:table-columns>
        <table:table-header-rows>
          <table:table-row table:style-name="ro29" table:default-cell-style-name="ce89">
            <table:table-cell table:style-name="ce90">
              <text:p text:style-name="P941"><text:span text:style-name="T1572">인과 분석 구분</text:span><text:span/></text:p>
            </table:table-cell>
            <table:table-cell table:style-name="ce91">
              <text:p text:style-name="P942"><text:span text:style-name="T1573">논리적 귀결 상태</text:span><text:span/></text:p>
            </table:table-cell>
            <table:table-cell table:style-name="ce92">
              <text:p text:style-name="P943"><text:span text:style-name="T1574">직관적 이해 비유</text:span><text:span/></text:p>
            </table:table-cell>
          </table:table-row>
        </table:table-header-rows>
        <table:table-row table:style-name="ro30" table:default-cell-style-name="ce89">
          <table:table-cell table:style-name="ce93">
            <text:p text:style-name="P944"><text:span text:style-name="T1575">사대 원인 타파</text:span><text:span/></text:p>
          </table:table-cell>
          <table:table-cell table:style-name="ce94">
            <text:p text:style-name="P945"><text:span text:style-name="T1576">네 가지 발생 경로가 모두 불가능함으로 증명됨</text:span><text:span/></text:p>
          </table:table-cell>
          <table:table-cell table:style-name="ce95">
            <text:p text:style-name="P946"><text:span text:style-name="T1577">거대한 마술 상자의 비밀 칸이 전부 비어 있음을 확인하는 것</text:span><text:span/></text:p>
          </table:table-cell>
        </table:table-row>
        <table:table-row table:style-name="ro31" table:default-cell-style-name="ce89">
          <table:table-cell table:style-name="ce96">
            <text:p text:style-name="P947"><text:span text:style-name="T1578">자성 없음의 실현</text:span><text:span/></text:p>
          </table:table-cell>
          <table:table-cell table:style-name="ce97">
            <text:p text:style-name="P948"><text:span text:style-name="T1579">고정된 실체 없이 오직 인연으로만 존재함</text:span><text:span/></text:p>
          </table:table-cell>
          <table:table-cell table:style-name="ce98">
            <text:p text:style-name="P949"><text:span text:style-name="T1580">수많은 실 가닥이 얽혀 만든 그물망에 고유한 중심이 없는 상태</text:span><text:span/></text:p>
          </table:table-cell>
        </table:table-row>
      </table:table>
      <text:p text:style-name="P950"><text:span text:style-name="T1581">존재는 홀로 빛나는 고독한 섬이 아니라, 서로가 서로를 비추어주는 수많은 거울방처럼 촘촘한 연기의 그물망으로 엮여 있는 투명하고 자유로운 공간인 셈이야.</text:span><text:span/></text:p>
      <text:p text:style-name="P951"><text:span text:style-name="T1582">📝 핵심 요약</text:span><text:span/></text:p>
      <text:list text:style-name="WWNum50" text:continue-numbering="true">
        <text:list-item>
          <text:p text:style-name="P952"><text:span text:style-name="T1583">사물은 이미 존재하거나 존재하지 않으므로 자기 자신으로부터 태어날 수 없음.</text:span><text:span/></text:p>
        </text:list-item>
        <text:list-item>
          <text:p text:style-name="P953"><text:span text:style-name="T1584">원인과 결과의 고유한 연관성이 없다면 타자로부터의 발생도 원천적으로 불가능함.</text:span><text:span/></text:p>
        </text:list-item>
        <text:list-item>
          <text:p text:style-name="P954"><text:span text:style-name="T1585">자타의 결합이나 원인 없는 우연한 발생 역시 논리적 모순과 허구에 불과함.</text:span><text:span/></text:p>
        </text:list-item>
        <text:list-item>
          <text:p text:style-name="P955"><text:span text:style-name="T1586">모든 발생 경로의 불가능성을 통해 사물에는 고정불변한 본질인 자성이 없음이 증명됨.</text:span><text:span/></text:p>
        </text:list-item>
      </text:list>
      <text:p text:style-name="P956"><text:span><text:soft-page-break/></text:span><text:span/><text:span/></text:p>
      <text:p text:style-name="P957"><text:span text:style-name="T1587">[🟢 Online Mode | 26.06.08_14:15:32]</text:span><text:span/></text:p>
      <text:p text:style-name="P958"><text:span text:style-name="T1588">50. 하나와 다수의 분석을 통한 공성의 확신</text:span><text:span/></text:p>
      <text:p text:style-name="P959"><text:span text:style-name="T1589">🔑 핵심 키워드: 이일다인, 하나와 다수, 자성 없음, 제법 분석, 공성</text:span><text:span/></text:p>
      <text:p text:style-name="P960"><text:span text:style-name="T1590">🔍 돋보기를 들고 세상의 실체를 들여다보기</text:span><text:span/></text:p>
      <text:p text:style-name="P961"><text:span text:style-name="T1591">우리는 눈앞에 보이는 사물들이나 우리 마음의 현상들이 원래부터 그 자리에 아주 단단하고 고정된 모습으로 존재한다고 믿어. 하지만 불교에서는 이것이 진짜 상하지 않는 알맹이를 가지고 있는지 아주 날카로운 지혜의 돋보기를 들고 검해봐야 한다고 가르치지. 이 분석법을 이일다인이라고 부르는데, 세상의 모든 현상을 하나라는 관점과 다수라는 관점 두 가지로 쪼개어 보면서 그것들의 진짜 정체를 밝혀내는 아주 정교한 생각의 도구야.</text:span><text:span/></text:p>
      <text:p text:style-name="P962"><text:span text:style-name="T1592">🚗 하나라는 단단한 껍질을 해체하기</text:span><text:span/></text:p>
      <text:p text:style-name="P963"><text:span text:style-name="T1593">가장 먼저 어떤 대상이 쪼갤 수 없는 완벽한 고유의 하나로 존재하는지 살펴볼까? 멋진 자동차 한 대가 있다고 해보자. 우리는 그것을 자동차 하나라고 부르지만, 나사를 풀고 바퀴를 빼고 엔진과 유리를 모두 분해해 놓으면 어디에도 자동차라는 독립된 알맹이는 남아있지 않아. 단지 여러 부품이 특정한 방식으로 모여 있는 상태일 뿐이지. 이처럼 세상 그 어떤 것도 분해되거나 나뉠 수 없는 절대적인 하나로는 존재할 수 없다는 걸 깨닫게 돼.</text:span><text:span/></text:p>
      <text:p text:style-name="P964"><text:span text:style-name="T1594">🌳 다수라는 모자이크의 정체</text:span><text:span/></text:p>
      <text:p text:style-name="P965"><text:span text:style-name="T1595">하나라는 개념이 무너지고 나면, 그것들이 모여서 만들어진 다수라는 개념도 도미노처럼 함께 무너지게 되어 있어. 왜냐하면 다수나 전체라는 것은 결국 아주 작은 하나하나가 모여서 이루어지는 모자이크 작품과 같기 때문이지. 나무 한 그루 한 그루가 실체로서 존재하지 않는다면, 그것들이 빽빽하게 모여 있는 거대한 숲 역시 이름만 숲일 뿐 고정된 알맹이를 가진 실체일 수는 없잖아. 결국 많고 복잡해 보이는 세상의 모든 현상도 그 바탕을 뜯어보면 실체가 없기는 마찬</text:span><text:span text:style-name="T1596">가지야.</text:span><text:span/></text:p>
      <text:p text:style-name="P966"><text:span text:style-name="T1597">🕊️ 고정된 실체가 없다는 위대한 확신</text:span><text:span/></text:p>
      <text:p text:style-name="P967"><text:span text:style-name="T1598">이렇게 하나와 다수라는 두 가지 길을 통해 세상을 철저하게 분석해 보면, 결론은 단 하나로 모이게 돼. 안팎의 모든 현상에는 원래부터 스스로 존재하는 고유한 자성이 없다는 확실한 결론이지. 이는 마치 텔레비전 화면 속의 화려한 영상이 가까이서 보면 그저 깜빡이는 작은 빛의 점들에 불과한 것과 같아. 고정된 실체가 없다는 이 공성의 이치를 명확하게 확신할 때, 우리는 세상에 대한 헛된 집착과 두려움에서 벗어나 진정한 마음의 자유를 얻게 된단다.</text:span><text:span/></text:p>
      <text:p text:style-name="P968"><text:span text:style-name="T1599">📝 핵심 요약</text:span><text:span/></text:p>
      <text:list text:style-name="WWNum51" text:continue-numbering="true">
        <text:list-item>
          <text:p text:style-name="P969"><text:span text:style-name="T1600">이일다인은 세상의 제법을 하나와 다수라는 두 가지 관점으로 나누어 분석하는 지혜의 도구다.</text:span><text:span/></text:p>
        </text:list-item>
        <text:list-item>
          <text:p text:style-name="P970"><text:span text:style-name="T1601">모든 사물은 부품과 요소로 분해되기 때문에 결코 쪼갤 수 없는 절대적인 하나로 존재하지 않는다.</text:span><text:span/></text:p>
        </text:list-item>
        <text:list-item>
          <text:p text:style-name="P971"><text:span text:style-name="T1602">실체적인 하나가 없다면 그것들이 모여 이루어진 다수의 현상 역시 고정된 알맹이를 가질 수 없다.</text:span><text:span/></text:p>
        </text:list-item>
        <text:list-item>
          <text:p text:style-name="P972"><text:span text:style-name="T1603">하나와 다수의 분석을 통해 모든 현상에 고유한 자성이 없음을 명확하게 인지하고 공성을 확신하게 된다.</text:span><text:span/></text:p>
        </text:list-item>
      </text:list>
      <text:p text:style-name="P973"><text:span><text:soft-page-break/></text:span><text:span/><text:span/></text:p>
      <text:p text:style-name="P974"><text:span text:style-name="T1604">51. 모든 존재의 고유한 실체가 비어 있다는 공성의 증명</text:span><text:span/></text:p>
      <text:p text:style-name="P975"><text:span text:style-name="T1605">🔑 핵심 키워드: 무자성, 칠십공성론, 중론, 공성의 성립</text:span><text:span/></text:p>
      <text:p text:style-name="P976"><text:span text:style-name="T1606">🎭 고정된 알맹이가 없는 빈 무대의 비유</text:span><text:span/></text:p>
      <text:p text:style-name="P977"><text:span text:style-name="T1607">사물들의 자성이 공하다는 뜻은, 어떤 존재도 홀로 독립해서 영원히 존재할 수 없다는 의미야. 연극 무대 위의 배우가 독단적으로 극을 이끌 수 없고 대본, 조명, 다른 배우들과의 관계 속에서만 배역으로 존재하듯이 말이지. 우리는 눈앞의 사물들이 저마다 고유한 알맹이를 가지고 굳건히 서 있다고 착각하지만, 실제로는 수많은 조건이 얽혀서 잠시 나타난 환영일 뿐이야. 용수 보살님은 우리가 매달리는 이 고정불변한 실체라는 착각을 날카롭게 깨뜨려 주셨어.</text:span><text:span/></text:p>
      <text:p text:style-name="P978"><text:span text:style-name="T1608">🛠️ 존재의 구조를 해체하는 논리의 망치, 중론</text:span><text:span/></text:p>
      <text:p text:style-name="P979"><text:span text:style-name="T1609">이 거대한 진리를 가장 완벽하게 입증한 대표적인 주석서가 바로 중론이야. 이것은 마치 대저택의 화려한 외관에 매료된 사람에게 건물을 받치는 철근, 시멘트, 벽돌을 낱낱이 분해해서 보여주는 정밀한 해체 작업과 같아. 당연히 원래부터 그 자리에 온전하게 존재했던 방은 없으며, 모든 것이 부품들의 정교한 조립품일 뿐이라는 사실을 증명하지. 중론의 가르침을 따라가다 보면 우리가 굳게 믿었던 고정관념의 벽들이 시원하게 허물어지게 돼.</text:span><text:span/></text:p>
      <text:p text:style-name="P980"><text:span text:style-name="T1610">📐 수학 공식처럼 명쾌한 인과의 증명, 칠십공성론</text:span><text:span/></text:p>
      <text:p text:style-name="P981"><text:span text:style-name="T1611">칠십공성론 역시 모든 사물이 원인과 결과의 사슬로 이어져 있다는 연기의 법칙을 통해 공성을 꼼꼼하게 정리해 줘. 필름 카메라로 찍은 영화가 스크린 위에서는 살아 움직이는 것처럼 보여도, 한 프레임씩 필름을 잘라보면 결국 정지된 사진들의 연속일 뿐인 것과 똑같은 이치야. 겉보기에는 연속적이고 실재하는 것처럼 보이는 현상들을 아주 미세한 현미경으로 들여다보듯 논리적으로 완벽하게 증명해 내는 영적인 징검다리라고 볼 수 있어.</text:span><text:span/></text:p>
      <text:p text:style-name="P982"><text:span text:style-name="T1612">🗝️ 착각의 사슬을 끊고 얻는 진짜 자유</text:span><text:span/></text:p>
      <text:p text:style-name="P983"><text:span text:style-name="T1613">위대한 논서들이 이토록 치열하게 공성을 증명하는 이유는, 우리가 허상에 속아 스스로 괴로움을 만들지 않도록 돕기 위함이야. 깊은 밤 고장 난 시계 소리를 귀신의 발소리로 착각해 밤새 공포에 떨다가, 아침에 불을 켜고 실체를 확인한 뒤 허탈하게 웃으며 안도하는 것과 같지. 자성이 비어 있음을 명확히 아는 순간, 우리는 세상을 있는 그대로 수용하고 나를 짓누르던 모든 집착의 사슬을 끊어내는 진정한 자유를 얻게 돼.</text:span><text:span/></text:p>
      <text:p text:style-name="P984"><text:span text:style-name="T1614">📝 핵심 요약</text:span><text:span/></text:p>
      <text:list text:style-name="WWNum52" text:continue-numbering="true">
        <text:list-item>
          <text:p text:style-name="P985"><text:span text:style-name="T1615">모든 사물은 독립된 고유한 알맹이가 없으며 조건에 의해 존재하는 공한 성질을 가짐.</text:span><text:span/></text:p>
        </text:list-item>
        <text:list-item>
          <text:p text:style-name="P986"><text:span text:style-name="T1616">중론은 겉보기에는 단단해 보이는 존재의 실상을 부품별로 해체하여 무자성을 입증함.</text:span><text:span/></text:p>
        </text:list-item>
        <text:list-item>
          <text:p text:style-name="P987"><text:span text:style-name="T1617">칠십공성론은 인과와 연기의 법칙을 바탕으로 공성의 원리를 정밀하게 증명함.</text:span><text:span/></text:p>
        </text:list-item>
        <text:list-item>
          <text:p text:style-name="P988"><text:span text:style-name="T1618">공성을 깨닫는 것은 허상에 속아 생기는 괴로움과 집착을 끝내고 자유를 얻는 열쇠임.</text:span><text:span/></text:p>
        </text:list-item>
      </text:list>
      <text:p text:style-name="P989"><text:span><text:soft-page-break/></text:span><text:span/><text:span/></text:p>
      <text:p text:style-name="P990"><text:span text:style-name="T1619">[🟢 Online Mode | 26.06.08_14:20:00]</text:span><text:span/></text:p>
      <text:p text:style-name="P991"><text:span text:style-name="T1620">52. 방대한 경전의 핵심 압축과 실천 수행의 목적</text:span><text:span/></text:p>
      <text:p text:style-name="P992"><text:span text:style-name="T1621">🔑 핵심 키워드: 방대한 교리, 번다함의 배제, 확정된 종의, 수행의 목적, 명상 실천</text:span><text:span/></text:p>
      <text:p text:style-name="P993"><text:span text:style-name="T1622">📚 두꺼운 백과사전 대신 요약 노트를 펼치는 이유</text:span><text:span/></text:p>
      <text:p text:style-name="P994"><text:span text:style-name="T1623">세상의 모든 지식을 담은 방대한 백과사전을 처음부터 끝까지 다 읽으려면 정작 중요한 실전을 시작하기도 전에 지쳐버리기 마련이야. 성자들이 남긴 수많은 경전과 논서들을 일일이 다 인용하고 설명하다 보면, 글이 너무 길어지고 번잡해져서 오히려 본질을 놓치기 쉽지. 그래서 이 가르침에서는 복잡한 이론의 나열을 과감하게 생략하고, 우리가 지금 당장 삶에서 써먹을 수 있는 에센스만을 쏙 골라 담은 핵심 요약 노트를 선물해 주는 거야.</text:span><text:span/></text:p>
      <text:p text:style-name="P995"><text:span text:style-name="T1624">🗺️ 검증된 정답만 모아놓은 든든한 족보</text:span><text:span/></text:p>
      <text:p text:style-name="P996"><text:span text:style-name="T1625">여기서 널리 장황하게 설명하지 않는 대신 제시하는 것은 바로 교리로 확정된 명확한 종의들이야. 수많은 과학자들이 수백 번의 실험을 거쳐 마침내 찾아낸 완벽한 공식처럼, 이미 수많은 성자들에 의해 참되다고 증명된 핵심 원리들이지. 불필요한 논쟁이나 부차적인 설명에 시간을 낭비하지 않도록, 오직 검증된 정답만을 명쾌하게 보여주니까 수행자는 의심 없이 이 길을 믿고 따라갈 수 있어.</text:span><text:span/></text:p>
      <text:p text:style-name="P997"><text:span text:style-name="T1626">🧘 머리로 이해하는 지식을 넘어 가슴으로 하는 명상</text:span><text:span/></text:p>
      <text:p text:style-name="P998"><text:span text:style-name="T1627">이렇게 복잡한 내용을 다 걷어내고 뼈대만 남긴 진짜 이유는 오직 하나, 바로 우리의 실제 수행과 명상을 돕기 위해서야. 지식을 많이 쌓아서 똑똑한 박사가 되는 게 목표가 아니라, 단 한 줄의 진리라도 내 마음에 깊이 새겨 삶을 변화시키는 게 진짜 목적이니까 말이지. 수영 교본을 수백 권 읽는 것보다 실제로 물에 뛰어들어 팔을 젓는 게 중요하듯, 이 가르침은 우리를 탁상공론의 자리에서 일어나 직접 명상의 바다로 뛰어들게 만들어 줘.</text:span><text:span/></text:p>
      <text:p text:style-name="P999"><text:span text:style-name="T1628">🚀 가볍고 날렵해진 영적 배낭과 초고속 전진</text:span><text:span/></text:p>
      <text:p text:style-name="P1000"><text:span text:style-name="T1629">불필요한 이론의 짐을 과감하게 덜어내면 우리의 영적 여정은 몰라보게 가볍고 날렵해져. 무거운 짐을 가득 짊어진 나그네는 조금만 걸어도 지치지만, 꼭 필요한 물건만 챙긴 배낭여행자는 험한 산길도 가뿐하게 올라갈 수 있는 이치와 같지. 지식의 번잡함을 싹 비워내고 오직 확고한 진리의 핵심만 가슴에 품은 채 나아갈 때, 우리는 깨달음이라는 최종 목적지를 향해 그 누구보다 빠르게 전진할 수 있단다.</text:span><text:span/></text:p>
      <text:p text:style-name="P1001"><text:span text:style-name="T1630">📝 핵심 요약</text:span><text:span/></text:p>
      <text:list text:style-name="WWNum53" text:continue-numbering="true">
        <text:list-item>
          <text:p text:style-name="P1002"><text:span text:style-name="T1631">모든 성언과 정리를 다 인용하면 글이 번잡해지므로 과감하게 생략했다.</text:span><text:span/></text:p>
        </text:list-item>
        <text:list-item>
          <text:p text:style-name="P1003"><text:span text:style-name="T1632">이미 완벽하게 검증되고 확정된 핵심 종의만을 엄선하여 제시한다.</text:span><text:span/></text:p>
        </text:list-item>
        <text:list-item>
          <text:p text:style-name="P1004"><text:span text:style-name="T1633">지식의 양을 늘리는 것이 아니라 실제 수행과 명상을 돕는 것이 유일한 목적이다.</text:span><text:span/></text:p>
        </text:list-item>
        <text:list-item>
          <text:p text:style-name="P1005"><text:span text:style-name="T1634">복잡한 이론의 짐을 비워내어 깨달음의 길을 더 가볍고 빠르게 전진하도록 돕는다.</text:span><text:span/></text:p>
        </text:list-item>
      </text:list>
      <text:p text:style-name="P1006"><text:span><text:soft-page-break/></text:span><text:span/><text:span/></text:p>
      <text:p text:style-name="P1007"><text:span text:style-name="T1635">53. 자성이 비어있음을 깨닫는 무아와 반야의 지혜</text:span><text:span/></text:p>
      <text:p text:style-name="P1008"><text:span text:style-name="T1636">🔑 핵심 키워드: 제법무자성, 무아인식, 반야수행, 본질의 공성</text:span><text:span/></text:p>
      <text:p text:style-name="P1009"><text:span text:style-name="T1637">🔍 모든 현상에 숨겨진 실체 없음에 대하여</text:span><text:span/></text:p>
      <text:p text:style-name="P1010"><text:span text:style-name="T1638">우리가 눈으로 보고 손으로 만지는 세상의 모든 현상과 사물들은 겉보기에는 고유하고 단단한 자신만의 성질을 가진 것처럼 보여. 하지만 그 내면을 아주 깊이 들여다보면, 그 어떤 것도 스스로 독립해서 존재할 수 있는 고유한 실체, 즉 자성을 가지고 있지 않단다. 세상의 모든 것은 수많은 원인과 조건들이 얽히고설켜 잠시 그 모습을 드러내고 있을 뿐이거든. 이처럼 모든 존재의 바탕이 텅 비어 있음을 명확하게 꿰뚫어 보고, 그 어떤 고정된 실체도 관찰할 수 없다는</text:span><text:span text:style-name="T1639"> 사실을 온전히 받아들이는 것이 바로 불교에서 말하는 가장 근본적인 지혜의 출발점이야.</text:span><text:span/></text:p>
      <text:p text:style-name="P1011"><text:span text:style-name="T1640">🌈 무지개와 같은 세상과 무아의 참뜻</text:span><text:span/></text:p>
      <text:p text:style-name="P1012"><text:span text:style-name="T1641">이것은 우리가 비가 그친 뒤 하늘에 아름답게 피어오른 무지개를 바라보는 것과 아주 비슷해. 무지개는 찬란한 색깔을 뿜내며 분명히 우리 눈앞에 존재하는 것처럼 보이지. 하지만 그 무지개를 붙잡으려고 가까이 다가가 보거나 그 본질을 파헤쳐 보면, 그것은 오직 햇빛과 물방울이라는 조건이 만나 잠시 만들어낸 환상일 뿐, 그 안에 무지개라는 독립된 알맹이나 고유한 실체는 전혀 들어있지 않잖아. 이처럼 세상 모든 현상에 붙잡을 만한 단단한 실체가 없음을 아는 것, </text:span><text:span text:style-name="T1642">그리고 내 손에 쥐어지는 고정된 나라는 존재 역시 없음을 깨닫는 것이 바로 무아의 참뜻이란다.</text:span><text:span/></text:p>
      <text:p text:style-name="P1013"><text:span text:style-name="T1643">🧘 대상을 고집하지 않는 진짜 반야의 수행</text:span><text:span/></text:p>
      <text:p text:style-name="P1014"><text:span text:style-name="T1644">아티샤 스승님은 바로 이 무아를 깊이 사유하고 닦아나가는 과정이야말로 참된 반야, 즉 최고 수준의 지혜를 수행하는 길이라고 명확하게 짚어주셔. 지혜의 수행이라는 것은 어디 먼 곳에 있는 신비로운 존재를 찾거나 특별한 지식을 머릿속에 집어넣는 것이 전혀 아니야. 내 마음과 외부 세계를 지탱하던 거친 집착의 실체들을 하나씩 내려놓고, 그것들이 본래 텅 비어 있음을 있는 그대로 관찰하는 것 자체가 가장 높은 차원의 명상이자 반야의 실천이지. 겉모습에 속아 무언</text:span><text:span text:style-name="T1645">가를 억지로 쥐어잡으려는 어리석은 손짓을 멈출 때, 비로소 참된 지혜의 눈이 활짝 열리게 되는 법이야.</text:span><text:span/></text:p>
      <text:p text:style-name="P1015"><text:span text:style-name="T1646">🌌 집착의 사슬을 끊어내는 온전한 자유</text:span><text:span/></text:p>
      <text:p text:style-name="P1016"><text:span text:style-name="T1647">결국 모든 현상에서 고유한 자성을 찾을 수 없다는 깨달음은 우리를 평생 괴롭혀온 온갖 집착과 두려움의 사슬로부터 완벽하게 해방시켜 준단다. 무언가 영원하고 단단한 실체가 있다는 착각 때문에 우리는 그것을 더 가지려고 욕심을 부리거나, 사라질까 봐 전전긍긍하며 고통을 받게 되는 거거든. 무지개 속에 손을 집어넣어도 아무것도 잡히지 않는다는 사실을 명확히 알게 되면, 더 이상 그것을 소유하려고 애쓰거나 붙잡지 못해 괴로워할 이유가 완전히 사라지는 것과 같아.</text:span><text:span text:style-name="T1648"> 이 무아의 지혜를 통해 우리는 세상 속에서 살아가되 그 어떤 것에도 걸림이 없는 절대적인 평온과 온전한 자유를 누릴 수 있게 된단다.</text:span><text:span/></text:p>
      <text:p text:style-name="P1017"><text:span text:style-name="T1649">📝 핵심 요약</text:span><text:span/></text:p>
      <text:list text:style-name="WWNum54" text:continue-numbering="true">
        <text:list-item>
          <text:p text:style-name="P1018"><text:span text:style-name="T1650">세상의 모든 현상은 스스로 독립하여 존재할 수 있는 고유한 실체가 없다.</text:span><text:span/></text:p>
        </text:list-item>
        <text:list-item>
          <text:p text:style-name="P1019"><text:span text:style-name="T1651">무지개가 빛과 물방울의 조건으로 잠시 나타나듯 모든 존재는 조건의 결합일 뿐 알맹이가 비어 있다.</text:span><text:span/></text:p>
        </text:list-item>
        <text:list-item>
          <text:p text:style-name="P1020"><text:span text:style-name="T1652">이러한 실체 없음을 명확히 알고 무아를 닦아나가는 과정이 바로 가장 높은 반야의 수행이다.</text:span><text:span/></text:p>
        </text:list-item>
        <text:list-item>
          <text:p text:style-name="P1021"><text:span text:style-name="T1653">고정된 실체가 없음을 깨달을 때 무의미한 소유욕과 집착에서 벗어나 온전한 마음의 자유를 얻는다.</text:span><text:span/></text:p>
        </text:list-item>
      </text:list>
      <text:p text:style-name="P1022"><text:span><text:soft-page-break/></text:span><text:span/><text:span/></text:p>
      <text:p text:style-name="P1023"><text:span text:style-name="T1654">54. 반야의 무자성과 무분별 명상의 원리</text:span><text:span/></text:p>
      <text:p text:style-name="P1024"><text:span text:style-name="T1655">🔑 핵심 키워드: 반야, 무자성, 무분별, 주객합일, 삼매수행</text:span><text:span/></text:p>
      <text:p text:style-name="P1025"><text:span text:style-name="T1656">🔍 세상의 실체 없음을 보는 지혜</text:span><text:span/></text:p>
      <text:p text:style-name="P1026"><text:span text:style-name="T1657">반야라는 깊은 지혜는 세상의 모든 현상과 인간에게 고정불변한 독립된 실체가 없다는 진실을 명확히 보는 힘이야. 이건 마치 화려한 마술 공연을 볼 때 눈앞의 비둘기가 진짜 무에서 나타난 게 아니라 소매 속의 트릭일 뿐임을 알아차리는 것과 같지. 겉으로는 단단하고 영원해 보이는 사물들도 결국 수많은 원인과 조건이 얽혀서 잠시 나타난 신기루일 뿐이라는 사실을 꿰뚫어 보는 단계란다.</text:span><text:span/></text:p>
      <text:p text:style-name="P1027"><text:span text:style-name="T1658">🪞 지혜 자체도 텅 비어 있다는 반전</text:span><text:span/></text:p>
      <text:p text:style-name="P1028"><text:span text:style-name="T1659">한 걸음 더 나아가 깊은 논리로 분석해 보면 사물의 실체 없음을 알아차린 그 반야라는 지혜 자체도 고정된 실체가 없어. 꿈속에서 멋진 보물을 바라볼 때 그 보물도 가짜지만 보물을 보고 기뻐하는 꿈속의 나 역시 진짜가 아닌 것과 완벽하게 똑같은 이치지. 대상을 비추는 거울 속의 영상만 가짜인 줄 알았더니 알고 보니 거울이라는 도구 자체도 인연 따라 잠시 존재하는 유령 같은 존재임을 깨닫는 거대한 반전이야.</text:span><text:span/></text:p>
      <text:p text:style-name="P1029"><text:span text:style-name="T1660">🧘 모든 생각이 끊어진 무분별의 상태</text:span><text:span/></text:p>
      <text:p text:style-name="P1030"><text:span text:style-name="T1661">외부 대상도 비어 있고 그것을 바라보는 나의 지혜마저도 텅 비어 있음을 완전히 깨달으면 마음은 마침내 그 어떤 주관과 객관의 나눔도 없는 완전한 고요함에 도달하게 돼. 이것을 바로 무분별이라고 부르는데 말과 생각이 완전히 끊어져 어떠한 편견이나 고정관념도 일어나지 않는 청정한 상태를 말해. 거센 파도가 완전히 가라앉아 호수 표면과 깊은 물속이 구별 없이 하나의 거대한 투명함으로 녹아드는 평화로운 순간과 같단다.</text:span><text:span/></text:p>
      <text:p text:style-name="P1031"><text:span text:style-name="T1662">🌊 본성을 회복하는 궁극의 명상 수행</text:span><text:span/></text:p>
      <text:p text:style-name="P1032"><text:span text:style-name="T1663">아티샤 스승은 이처럼 주객의 분별이 완전히 사라진 텅 빈 고요함인 무분별을 마음속에 깊이 고착시키고 늘 머물며 닦으라고 권하고 있어. 생각으로 억지로 계산하거나 붙잡으려 하지 말고 있는 그대로의 청정한 상태에 마음을 가만히 내려놓는 명상을 이어가는 거지. 이렇게 내면의 본성을 온전히 회복할 때 우리의 의식은 한계를 넘어 온 우주와 완전한 조화를 이루는 해탈의 길로 나아가게 돼.</text:span><text:span/></text:p>
      <text:p text:style-name="P1033"><text:span text:style-name="T1664">📝 핵심 요약</text:span><text:span/></text:p>
      <text:list text:style-name="WWNum55" text:continue-numbering="true">
        <text:list-item>
          <text:p text:style-name="P1034"><text:span text:style-name="T1665">반야는 세상의 모든 현상에 고정된 독립 실체가 없음을 명확히 꿰뚫어 보는 지혜야.</text:span><text:span/></text:p>
        </text:list-item>
        <text:list-item>
          <text:p text:style-name="P1035"><text:span text:style-name="T1666">철저한 분석을 거치면 대상을 바라보는 반야 지혜 자체도 결국 무자성의 속성을 지니고 있어.</text:span><text:span/></text:p>
        </text:list-item>
        <text:list-item>
          <text:p text:style-name="P1036"><text:span text:style-name="T1667">주관과 객관의 구분이 사라져 말과 생각이 완전히 끊어진 청정한 상태를 무분별이라고 불러.</text:span><text:span/></text:p>
        </text:list-item>
        <text:list-item>
          <text:p text:style-name="P1037"><text:span text:style-name="T1668">대상과 지혜가 모두 텅 비었음을 알고 무분별의 고요함 속에 머무는 명상을 닦아야 해.</text:span><text:span/></text:p>
        </text:list-item>
      </text:list>
      <text:p text:style-name="P1038"><text:span><text:soft-page-break/></text:span><text:span/><text:span/></text:p>
      <text:p text:style-name="P1039"><text:span text:style-name="T1669">[🟢 Online Mode | 26.06.08_14:15:00]</text:span><text:span/></text:p>
      <text:p text:style-name="P1040"><text:span text:style-name="T1670">55. 분별심의 허상과 최상의 열반</text:span><text:span/></text:p>
      <text:p text:style-name="P1041"><text:span text:style-name="T1671">🔑 핵심 키워드: 삼유, 분별심, 가립, 니르바나, 생각의 소멸</text:span><text:span/></text:p>
      <text:p text:style-name="P1042"><text:span text:style-name="T1672">🌀 생각이 만들어낸 가상의 세계</text:span><text:span/></text:p>
      <text:p text:style-name="P1043"><text:span text:style-name="T1673">우리가 살아가고 있는 이 번잡한 세상과 인생은 사실 우리 마음속에서 끊임없이 일어나는 분별하는 생각에서 비롯된 것이야. 이것은 마치 가상현실 게임을 할 때 컴퓨터가 실시간으로 수많은 코드를 계산해서 우리 눈앞에 거대한 입체 세계를 만들어내는 것과 똑같아. 원래는 텅 비어 있는 모니터 화면일 뿐인데, 프로그램이 작동하면서 진짜 살아있는 세상처럼 착착각하게 만드는 거지. 우리가 마주하는 기쁨과 슬픔, 고통의 세계도 결국 분별심이라는 엔진이 돌린 가상의 프로그</text:span><text:span text:style-name="T1674">램이란다.</text:span><text:span/></text:p>
      <text:p text:style-name="P1044"><text:span text:style-name="T1675">🎭 실체 없는 이름표와 가립의 허상</text:span><text:span/></text:p>
      <text:p text:style-name="P1045"><text:span text:style-name="T1676">이 세상의 본질을 깊이 들여다보면 실제로는 단단한 알갱이가 있는 게 아니라 모두 생각이 만들어낸 이름표에 불과해. 연극 무대 위에서 배우가 왕의 옷을 입고 나오면 모두가 머리를 숙이지만 무대 뒤로 가면 평범한 사람인 것처럼, 세상 만물도 우리가 붙여놓은 개념의 옷을 입고 존재할 뿐이지. 내 마음에 들면 좋은 것, 마음에 안 들면 나쁜 것이라고 이분법적으로 쪼개어 보는 분별심 자체가 이 세계의 진짜 정체이자 거미줄 같은 구조야.</text:span><text:span/></text:p>
      <text:p text:style-name="P1046"><text:span text:style-name="T1677">🛑 플러그를 뽑아 생각을 멈추는 일</text:span><text:span/></text:p>
      <text:p text:style-name="P1047"><text:span text:style-name="T1678">그렇기 때문에 고통에서 완전히 벗어나기 위해서는 마음에 가득 찬 분별의 생각들을 단 하나도 남김없이 깨끗하게 끊어내야만 해. 밤새도록 무서운 꿈을 꾸며 가위에 눌릴 때 거기서 벗어나는 유일한 방법은 꿈속에서 도망치는 게 아니라 그냥 눈을 번쩍 뜨고 잠에서 깨어나는 것과 같지. 생각을 이리저리 굴려 문제를 해결하려는 노력을 멈추고, 생각을 만들어내는 메인 전원의 플러그를 통째로 뽑아버리는 과감한 멈춤이 필요해.</text:span><text:span/></text:p>
      <text:p text:style-name="P1048"><text:span text:style-name="T1679">🌅 분별이 가라앉은 최상의 열반</text:span><text:span/></text:p>
      <text:p text:style-name="P1049"><text:span text:style-name="T1680">내 마음을 어지럽히던 모든 분별의 파도가 완전히 가라앉아 고요해진 상태를 불교에서는 최상의 니르바나라고 불러. 거센 태풍이 몰아치던 바다가 거짓말처럼 잔잔해져서 하늘의 달을 그대로 비추는 맑은 거울이 되는 것처럼, 우리 의식도 본래의 투명함을 회복하는 거지. 더 이상 좋고 싫은 분별에 휘둘리지 않고 모든 고통이 완벽하게 사라진 이 자리가 바로 우리가 도달해야 할 가장 평화롭고 고귀한 종착역이란다.</text:span><text:span/></text:p>
      <text:p text:style-name="P1050"><text:span text:style-name="T1681">📝 핵심 요약</text:span><text:span/></text:p>
      <text:list text:style-name="WWNum56" text:continue-numbering="true">
        <text:list-item>
          <text:p text:style-name="P1051"><text:span text:style-name="T1682">우리가 경험하는 이 세상은 마음의 분별하는 생각에서 생겨난 가상의 세계이다.</text:span><text:span/></text:p>
        </text:list-item>
        <text:list-item>
          <text:p text:style-name="P1052"><text:span text:style-name="T1683">세상 만물은 고정된 실체가 없으며 분별심이 붙인 이름표와 개념으로 유지된다.</text:span><text:span/></text:p>
        </text:list-item>
        <text:list-item>
          <text:p text:style-name="P1053"><text:span text:style-name="T1684">고통의 굴레를 끊기 위해서는 내면의 분별심을 남김없이 소멸해야 한다.</text:span><text:span/></text:p>
        </text:list-item>
        <text:list-item>
          <text:p text:style-name="P1054"><text:span text:style-name="T1685">모든 생각이 멈추고 고요해진 상태가 바로 가장 고귀한 깨달음인 열반이다.</text:span><text:span/></text:p>
        </text:list-item>
      </text:list>
      <text:p text:style-name="P1055"><text:span><text:soft-page-break/></text:span><text:span/><text:span/></text:p>
      <text:p text:style-name="P1056"><text:span text:style-name="T1686">[🟢 Online Mode | 26.06.08_14:12:04]</text:span><text:span/></text:p>
      <text:p text:style-name="P1057"><text:span text:style-name="T1687">56. 분별의 감옥을 벗어나는 허공 같은 지혜</text:span><text:span/></text:p>
      <text:p text:style-name="P1058"><text:span text:style-name="T1688">🔑 핵심 키워드: 분별심, 근원적 무명, 무분별 선정, 허공 같은 지혜</text:span><text:span/></text:p>
      <text:p text:style-name="P1059"><text:span text:style-name="T1689">🕸️ 세존께서 친히 말씀하시기를 우리가 평소에 끊임없이 머리를 굴려 만들어내는 이분법적인 분별심이야말로 중생의 눈을 가로막는 가장 거대한 어둠인 무명이라고 하셨어. 이것은 마치 깨끗하고 투명한 유리창에 쉴 새 없이 정체 모를 낙서를 가득 채워 넣어서 바깥의 아름다운 풍경을 전혀 보지 못하게 스스로 차단하는 것과 같지. 우리가 맞다 틀리다 혹은 좋다 싫다 나누는 그 수많은 생각의 파편들이 결국은 우리 마음의 순수한 본질을 흐리게 만드는 주범인 셈이야.</text:span><text:span/></text:p>
      <text:p text:style-name="P1060"><text:span text:style-name="T1690">🌊 이 분별하는 마음은 우리를 끝없이 거칠게 소용돌이치는 윤회의 바다로 사정없이 밀어뜨려 깊은 고통 속에 빠져나오지 못하게 만들어. 마치 거대한 늪지대에 발이 빠진 나그네가 밖으로 나오려고 허우적거리면 거릴수록 몸이 점점 더 깊은 진흙 속으로 빨려 들어가는 안타까운 상황과 아주 비슷해. 내가 스스로 만들어낸 고정관념과 차별하는 생각들이 자신을 죌아매는 단단한 쇠사슬이 되어 우리를 괴로움의 감옥에 가두는 원리가 바로 여기에 있어.</text:span><text:span/></text:p>
      <text:p text:style-name="P1061"><text:span text:style-name="T1691">🧘 하지만 이 모든 괴로움의 사슬을 끊어내는 열쇠는 바로 그 어떤 생각의 흔적도 남기지 않는 무분별의 깊은 선정에 고요히 머무르는 일이야. 비바람이 거세게 몰아쳐서 진흙탕물로 가득 찼던 호수를 가만히 내버려 두면 시간이 흐르면서 가라앉을 오물들이 바닥으로 다 가라앉고 마침내 속이 훤히 들여다보이는 투명한 물이 되는 이치와 같지. 억지로 생각을 없애려고 애쓰는 게 아니라 마음을 어지럽히던 모든 분별의 요동을 조용히 내려놓고 온전한 평온을 마주하는 상태를 뜻</text:span><text:span text:style-name="T1692">해.</text:span><text:span/></text:p>
      <text:p text:style-name="P1062"><text:span text:style-name="T1693">🌌 이렇게 모든 분별심이 가라앉은 고요한 선정 속에서 우리는 마침내 맑은 가을날의 드넓은 허공처럼 끝없이 펼쳐진 무분별지의 찬란한 빛남을 온전히 마주하게 돼. 구름 한 점 없이 파랗게 트인 하늘은 그 어떤 먼지나 오염물질도 붙잡아두지 않고 그 자체로 완벽하게 청정하고 맑은 본모습을 보여주잖아. 우리의 본래 마음도 이 허공과 같아서 분별의 구름만 걷어내면 언제나 스스로 빛나고 있는 근원의 지혜를 회복할 수 있는 영광스러운 기회를 잡게 되는 거야.</text:span><text:span/></text:p>
      <text:p text:style-name="P1063"><text:span text:style-name="T1694">📝 핵심 요약</text:span><text:span/></text:p>
      <text:list text:style-name="WWNum57" text:continue-numbering="true">
        <text:list-item>
          <text:p text:style-name="P1064"><text:span text:style-name="T1695">실집의 분별심은 중생의 눈을 가리는 거대한 어둠이자 무명의 근원이다.</text:span><text:span/></text:p>
        </text:list-item>
        <text:list-item>
          <text:p text:style-name="P1065"><text:span text:style-name="T1696">분별하는 생각은 의식을 끝없는 고통과 윤회의 바다로 떨어뜨리는 원인이 된다.</text:span><text:span/></text:p>
        </text:list-item>
        <text:list-item>
          <text:p text:style-name="P1066"><text:span text:style-name="T1697">모든 분별을 내려놓은 무분별의 선정은 마음의 요동을 가라앉히는 유일한 방편이다.</text:span><text:span/></text:p>
        </text:list-item>
        <text:list-item>
          <text:p text:style-name="P1067"><text:span text:style-name="T1698">분별의 구름이 걷힌 마음은 허공처럼 청정하고 찬란한 근원의 지혜를 드러낸다.</text:span><text:span/></text:p>
        </text:list-item>
      </text:list>
      <text:p text:style-name="P1068"><text:span><text:soft-page-break/></text:span><text:span/><text:span/></text:p>
      <text:p text:style-name="P1069"><text:span text:style-name="T1699">[🟢 Online Mode | 26.06.08_14:12:08]</text:span><text:span/></text:p>
      <text:p text:style-name="P1070"><text:span text:style-name="T1700">57. 분별을 넘어 궁극의 고요함으로 드는 무분별의 지혜</text:span><text:span/></text:p>
      <text:p text:style-name="P1071"><text:span text:style-name="T1701">🔑 핵심 키워드: 입무분별다라니경, 무생의 법, 무분별 사유, 분별의 초월</text:span><text:span/></text:p>
      <text:p text:style-name="P1072"><text:span text:style-name="T1702">📜 입무분별다라니경이 전하는 깊은 명상의 세계</text:span><text:span/></text:p>
      <text:p text:style-name="P1073"><text:span text:style-name="T1703">입무분별다라니경이라는 깊은 경전에서는 우리가 어떻게 해야 복잡한 마음의 굴레에서 완전히 벗어날 수 있는지 명확한 길을 제시하고 있어. 이것은 복잡한 미로에 갇혀서 출구를 찾지 못하고 헤매고 있을 때, 미로 전체를 하늘에서 한눈에 내려다볼 수 있는 마법의 지도를 얻는 것과 아주 비슷하지. 이 거룩한 가르침의 안내를 따라가면 우리는 어지러운 생각의 소음을 끄고 본래 깨끗한 마음의 상태로 돌아갈 수 있는 강력한 힌트를 얻게 돼.</text:span><text:span/></text:p>
      <text:p text:style-name="P1074"><text:span text:style-name="T1704">🛑 생각을 쉬어가는 무분별 사유의 힘</text:span><text:span/></text:p>
      <text:p text:style-name="P1075"><text:span text:style-name="T1705">태어난 적도 없고 사라진 적도 없는 본래 공한 진리 위에서 수행자가 모든 분별심을 내려놓고 명상에 드는 것을 무분별 사유라고 불러. 우리가 매일 쓰는 스마트폰에 너무 많은 앱이 동시에 켜져 있어서 시스템이 버벅거릴 때, 실행 중인 모든 앱을 일시에 종료하고 메모리를 깨끗하게 비워내는 청소 작업과 같다고 보면 돼. 이것저것 따지고 비교하는 거친 생각들을 잠시 쉬어줄 때, 마음은 비로소 본래의 고요하고 강력한 기능을 회복하기 시작하는 거지.</text:span><text:span/></text:p>
      <text:p text:style-name="P1076"><text:span text:style-name="T1706">🌊 거친 생각의 파도를 넘어서는 과정</text:span><text:span/></text:p>
      <text:p text:style-name="P1077"><text:span text:style-name="T1707">우리가 일상에서 마주하는 수많은 고정관념과 옳고 그름을 격렬하게 따지는 생각들은 사실 건너기 참 힘든 거친 파도와 같아. 마치 폭풍우가 몰아치는 거대한 밤바다를 맨몸으로 헤엄쳐 건너려는 것처럼, 분별의 세계를 벗어나는 것은 인간의 관성상 결코 쉬운 일이 아니지. 하지만 무분별의 명상을 꾸준히 지속하면, 거센 파도가 치는 표면을 지나 아무런 미동도 없는 깊고 평온한 심해의 흐름을 타는 것처럼 거친 생각의 장애물들을 부드럽고 안전하게 넘어서게 돼.</text:span><text:span/></text:p>
      <text:p text:style-name="P1078"><text:span text:style-name="T1708">🏔️ 차례로 도달하는 궁극의 고요한 경지</text:span><text:span/></text:p>
      <text:p text:style-name="P1079"><text:span text:style-name="T1709">수행을 이어가다 보면 마음은 단번에 바뀌는 게 아니라 계단을 하나씩 밟아 올라가듯 차례차대로 단계적인 고요함에 도달하게 된단다. 흙탕물이 가득 담긴 그릇을 움직이지 않고 가만히 내버려두면 시간이 지나면서 무거운 진흙은 아래로 가라앉고 위에는 투명한 물만 남는 자연스러운 정화 과정과 똑같아. 복잡한 생각의 앙금들이 순서대로 가라앉으면서 마침내 도달하는 무분별의 경지는, 우리 마음이 머물 수 있는 가장 평온하고 자유로운 궁극의 안식처가 되어주는 셈이야.</text:span><text:span/></text:p>
      <text:p text:style-name="P1080"><text:span text:style-name="T1710">📝 핵심 요약</text:span><text:span/></text:p>
      <text:list text:style-name="WWNum58" text:continue-numbering="true">
        <text:list-item>
          <text:p text:style-name="P1081"><text:span text:style-name="T1711">입무분별다라니경은 분별을 넘어 무분별의 경지에 이르는 정교한 명상의 길을 밝혀줌.</text:span><text:span/></text:p>
        </text:list-item>
        <text:list-item>
          <text:p text:style-name="P1082"><text:span text:style-name="T1712">본래 태어남이 없는 진리 속에서 생각을 쉬는 무분별 사유는 마음의 메모리를 청소하는 것과 같음.</text:span><text:span/></text:p>
        </text:list-item>
        <text:list-item>
          <text:p text:style-name="P1083"><text:span text:style-name="T1713">옳고 그름을 따지는 거친 분별의 파도를 넘어서야 깊은 심해 같은 평온함을 마주할 수 있음.</text:span><text:span/></text:p>
        </text:list-item>
        <text:list-item>
          <text:p text:style-name="P1084"><text:span text:style-name="T1714">수행을 통해 마음의 소음이 차례대로 가라앉으면 궁극의 자유로운 무분별의 경지를 얻게 됨.</text:span><text:span/></text:p>
        </text:list-item>
      </text:list>
      <text:p text:style-name="P1085"><text:span><text:soft-page-break/></text:span><text:span/><text:span/></text:p>
      <text:p text:style-name="P1086"><text:span text:style-name="T1715">58. 성언과 정리로 확정하는 무자성과 무분별의 명상</text:span><text:span/></text:p>
      <text:p text:style-name="P1087"><text:span text:style-name="T1716">🔑 핵심 키워드: 성언과 정리, 무생, 무자성, 무분별 명상</text:span><text:span/></text:p>
      <text:p text:style-name="P1088"><text:span text:style-name="T1717">📜 부처님의 가르침인 성언과 이치에 맞는 올바른 생각인 정리를 결합하는 것은, 복잡한 미로를 탈출하기 위해 정밀한 지도와 고성능 내비게이션을 동시에 켜는 것과 같아. 성인의 말씀이라는 지도를 보고, 올바른 논리라는 내비게이션의 안내를 받으며 사유하다 보면 우리를 속이던 수많은 착각과 오류들이 눈 녹듯 사라지게 되지. 이 두 가지 도구를 교차 검증하며 나아갈 때, 우리는 비로소 진리의 길에서 한 치의 오차도 없이 똑바로 걸어갈 수 있는 단단한 확신을 얻게 </text:span><text:span text:style-name="T1718">된단다.</text:span><text:span/></text:p>
      <text:p text:style-name="P1089"><text:span text:style-name="T1719">🔍 이 단단한 도구들을 통해 세상 모든 현상이 본래 생겨난 바가 없고 고정된 실체(자성)가 없다는 무자성의 진리를 명확하게 확정 지어야 해. 세상의 모든 물건과 현상들은 원래부터 그 자리에 완벽하게 존재하던 게 아니라, 수많은 원인과 조건이 일시적으로 만나서 빚어낸 거울 속의 영상이나 그림자 같은 존재일 뿐이거든. 겉으로 보기에는 단단하고 영원해 보이지만 진짜 알맹이는 텅 비어 있다는 이 무자성의 사실을 뼈저리게 깨닫는 것이 지혜의 시작이야.</text:span><text:span/></text:p>
      <text:p text:style-name="P1090"><text:span text:style-name="T1720">🧘 이렇게 모든 사물에 고정된 실체가 없음을 지성으로 완벽하게 확신하고 나면, 마침내 모든 시시비비와 이분법적인 생각을 완전히 내려놓는 무분별의 명상으로 들어가게 돼. 이건 매일 요란하게 켜져서 수많은 정보를 쏟아내던 컴퓨터의 모니터 전원을 잠시 끄고, 소음이 전혀 없는 깊은 고요 속으로 의식을 편안하게 침잠시키는 것과 완전히 똑같아. 머리로 이리저리 따지던 거친 생각의 파도가 멈추고 온전한 평정이 찾아오는 순간이지.</text:span><text:span/></text:p>
      <text:p text:style-name="P1091"><text:span text:style-name="T1721">🌌 편견과 분별심이 사라진 이 청정한 자리는 단순히 아무것도 생각하지 못하는 멍한 상태가 아니라, 왜곡 없는 우주의 진짜 모습을 있는 그대로 비추는 가장 지혜로운 상태야. 이른 아침 온 세상을 뿌옇게 가리고 있던 안개가 바람에 완전히 걷히면서 눈앞의 드넓은 풍경이 한눈에 투명하게 들어오는 해방감과 같단다. 성언과 정리로 다진 단단한 기초 위에서 무분별의 명상을 여실하게 닦아나갈 때 우리는 마침내 성불이라는 궁극의 자유를 얻게 돼.</text:span><text:span/></text:p>
      <text:p text:style-name="P1092"><text:span text:style-name="T1722">📝 핵심 요약</text:span><text:span/></text:p>
      <text:list text:style-name="WWNum59" text:continue-numbering="true">
        <text:list-item>
          <text:p text:style-name="P1093"><text:span text:style-name="T1723">부처님의 성언과 올바른 논리적 정리를 통해 진리에 대한 단단한 확신을 세움</text:span><text:span/></text:p>
        </text:list-item>
        <text:list-item>
          <text:p text:style-name="P1094"><text:span text:style-name="T1724">모든 현상이 본래 생겨남이 없고 고정된 실체가 없다는 무자성의 원리를 확정함</text:span><text:span/></text:p>
        </text:list-item>
        <text:list-item>
          <text:p text:style-name="P1095"><text:span text:style-name="T1725">지성적 확신을 바탕으로 거친 이분법적 생각을 내려놓는 무분별의 명상으로 진입함</text:span><text:span/></text:p>
        </text:list-item>
        <text:list-item>
          <text:p text:style-name="P1096"><text:span text:style-name="T1726">분별심의 안개를 걷어내고 우주의 본질을 있는 그대로 비춤으로써 궁극의 자유를 성취함</text:span><text:span/></text:p>
        </text:list-item>
      </text:list>
      <text:p text:style-name="P1097"><text:span><text:soft-page-break/></text:span><text:span/><text:span/></text:p>
      <text:p text:style-name="P1098"><text:span text:style-name="T1727">[🟢 Online Mode | 26.06.08_14:15:00]</text:span><text:span/></text:p>
      <text:p text:style-name="P1099"><text:span text:style-name="T1728">59. 진성의 수습과 깨달음의 가속도</text:span><text:span/></text:p>
      <text:p text:style-name="P1100"><text:span text:style-name="T1729">🔑 핵심 키워드: 진성 수습, 난위 성취, 환희지 도달, 붓다의 보리</text:span><text:span/></text:p>
      <text:p text:style-name="P1101"><text:span text:style-name="T1730">🌲 따뜻한 땅을 일구는 진성의 수습</text:span><text:span/></text:p>
      <text:p text:style-name="P1102"><text:span text:style-name="T1731">우리가 사물의 변하지 않는 참된 성품인 진성을 끊임없이 닦고 마음에 익히는 단계야. 비유하자면 한겨울의 꽁꽁 얼어붙은 땅에 무작정 씨앗을 심는 대신, 따뜻한 온풍기를 틀어 대지를 부드럽게 녹이는 기초 작업과 똑같지. 본래의 순수한 성품에 마음을 계속 집중하다 보면, 차갑게 굳어 있던 고정관념과 번뇌의 얼음이 서서히 녹아내리며 위대한 변화를 받아들일 준비를 마치게 돼.</text:span><text:span/></text:p>
      <text:p text:style-name="P1103"><text:span text:style-name="T1732">🔥 깨달음의 불씨가 지펴지는 난위</text:span><text:span/></text:p>
      <text:p text:style-name="P1104"><text:span text:style-name="T1733">진성을 정성껏 닦다 보면 지혜의 서막을 알리는 난위의 단계에 자연스럽게 도달하게 되지.</text:span><text:span/></text:p>
      <text:list text:style-name="WWNum60" text:continue-numbering="true">
        <text:list-item>
          <text:p text:style-name="P1105"><text:span text:style-name="T1734">단계의 의미: 본격적인 지혜의 불꽃이 타오르기 직전, 마음에 따뜻한 온기가 감도는 상태</text:span><text:span/></text:p>
        </text:list-item>
        <text:list-item>
          <text:p text:style-name="P1106"><text:span text:style-name="T1735">직관적 비유: 마른 나무틀에 막대를 대고 온 힘을 다해 비빌 때, 불꽃이 팍 튀기 직전에 연기가 피어오르며 뜨거운 열기가 주변을 가득 채우는 순간과 같아</text:span><text:span/></text:p>
        </text:list-item>
        <text:list-item>
          <text:p text:style-name="P1107"><text:span text:style-name="T1736">이 따뜻한 열정의 에너지는 우리가 곧 우주의 진리를 직접 마주하게 될 것이라는 무언의 신호와도 같은 거야.</text:span><text:span/></text:p>
        </text:list-item>
      </text:list>
      <text:p text:style-name="P1108"><text:span text:style-name="T1737">🎉 기쁨으로 첫발을 내딛는 환희지</text:span><text:span/></text:p>
      <text:p text:style-name="P1109"><text:span text:style-name="T1738">마음의 온기가 마침내 완전한 지혜의 빛으로 폭발하면 보살의 첫 번째 경지인 환희지에 발을 디디게 돼. 평생 앞을 보지 못하던 사람이 마침내 눈을 떠서 눈부시게 떠오르는 아침 태양과 대자연의 아름다운 풍경을 처음으로 목격했을 때 터져 나오는 벅찬 감동과 완벽하게 똑같지. 세상의 진정한 실상을 온몸으로 깨달았을 때 느끼는 이 거대한 기쁨은 존재를 완전히 새로운 차원의 성자로 탈바꿈시켜 줘.</text:span><text:span/></text:p>
      <text:p text:style-name="P1110"><text:span text:style-name="T1739">🚀 지평선 너머 펼쳐지는 붓다의 보리</text:span><text:span/></text:p>
      <text:p text:style-name="P1111"><text:span text:style-name="T1740">환희지를 시작으로 더 높은 경지들을 차례로 밟아 나가다 보면, 마침내 궁극의 목표인 붓다의 완벽한 깨달음도 머지않아 완성하게 돼. 대기권을 뚫고 올라가기 위해 엄청난 연료를 태우던 로켓이 일단 인력권을 벗어나면 우주의 무한한 궤도를 따라 엄청난 속도로 매끄럽게 질주하는 것과 흡사하지. 초반의 험난한 고비들을 무사히 넘겼기 때문에, 이제 최고의 깨달음이라는 종착지까지는 거침없는 가속도가 붙어 도달하게 되는 셈이야.</text:span><text:span/></text:p>
      <text:p text:style-name="P1112"><text:span text:style-name="T1741">📝 핵심 요약</text:span><text:span/></text:p>
      <text:list text:style-name="WWNum60" text:continue-numbering="true">
        <text:list-item>
          <text:p text:style-name="P1113"><text:span text:style-name="T1742">사물의 참된 성품인 진성을 꾸준히 수습함으로써 마음의 언 땅을 녹여냄.</text:span><text:span/></text:p>
        </text:list-item>
        <text:list-item>
          <text:p text:style-name="P1114"><text:span text:style-name="T1743">지혜의 불꽃이 일기 직전 마음에 영적인 온기가 가득 차오르는 난위를 얻음.</text:span><text:span/></text:p>
        </text:list-item>
        <text:list-item>
          <text:p text:style-name="P1115"><text:span text:style-name="T1744">진리를 직접 목격하고 눈을 뜨며 보살의 첫 경지인 환희지에 기쁘게 도달함.</text:span><text:span/></text:p>
        </text:list-item>
        <text:list-item>
          <text:p text:style-name="P1116"><text:span text:style-name="T1745">가속도가 붙은 수행을 통해 최종 목적지인 붓다의 보리를 머지않아 성취함.</text:span><text:span/></text:p>
        </text:list-item>
      </text:list>
      <text:p text:style-name="P1117"><text:span><text:soft-page-break/></text:span><text:span/><text:span/></text:p>
      <text:p text:style-name="P1118"><text:span text:style-name="T1746">60. 진언의 신비로운 힘과 팔대성취의 위력</text:span><text:span/></text:p>
      <text:p text:style-name="P1119"><text:span text:style-name="T1747">🔑 핵심 키워드: 진언, 식멸, 증익, 사업, 보병, 팔대성취</text:span><text:span/></text:p>
      <text:p text:style-name="P1120"><text:span text:style-name="T1748">🔮 소망을 현실로 만드는 진언의 마법</text:span><text:span/></text:p>
      <text:p text:style-name="P1121"><text:span text:style-name="T1749">우리가 마음의 깊은 고요함을 넘어 더 큰 영적인 힘을 발휘하고 싶을 때, 진언이라는 강력한 도구를 사용하게 돼. 진언은 복잡한 자물쇠를 단숨에 열어주는 마스터키나 컴퓨터의 성능을 극대화하는 부스터 프로그램과 같지. 이 신비로운 소리의 에너지를 올바르게 활용하면, 우리 삶의 부정적인 장애물들을 말끔히 청소하고 긍정적인 복덕을 채우는 놀라운 변화를 스스로 만들어낼 수 있어.</text:span><text:span/></text:p>
      <text:p text:style-name="P1122"><text:span text:style-name="T1750">🧹 삶의 길을 닦고 번영을 이끄는 네 가지 작업</text:span><text:span/></text:p>
      <text:p text:style-name="P1123"><text:span text:style-name="T1751">진언의 힘을 통해 행하는 구체적인 활동들을 식멸과 증익을 포함한 네 가지 사업이라고 불러. 식멸은 거친 폭풍우가 몰아칠 때 날씨를 고요하게 가라앉히듯 우리를 가로막는 재앙이나 번뇌를 지워내는 작업이고, 증익은 비어 있는 창고에 보물을 가득 채우거나 작은 새싹에 물을 주어 거대한 나무로 키우듯 지혜와 복덕을 늘리는 작업이야. 이 네 가지 에너지를 자유자재로 다루면서 수행자는 온 세상의 고통을 치유할 강력한 수단을 손에 쥐게 되는 셈이지.</text:span><text:span/></text:p>
      <text:p text:style-name="P1124"><text:span text:style-name="T1752">🍯 무엇이든 채워주는 신비로운 요술 항아리</text:span><text:span/></text:p>
      <text:p text:style-name="P1125"><text:span text:style-name="T1753">이렇게 진언의 힘이 극에 달하면 무엇이든 소망하는 대로 이루어주는 소망충족의 보병을 얻는 것과 같은 신비로운 경지에 이르게 돼. 이것은 마치 아무리 꺼내 써도 화수분처럼 마르지 않고 맛있는 음식을 계속 만들어내는 요술 항아리나, 원하는 것은 무엇이든 즉시 건네주는 우주의 무한 자판기와 같아. 물질적인 풍요를 넘어 내면의 영적인 자산까지 완벽하게 충족시켜 주는 자비로운 힘의 상징이라고 볼 수 있지.</text:span><text:span/></text:p>
      <text:p text:style-name="P1126"><text:span text:style-name="T1754">⚡ 한계를 뛰어넘는 여덟 가지 초능력의 완성</text:span><text:span/></text:p>
      <text:p text:style-name="P1127"><text:span text:style-name="T1755">보병의 성취를 시작으로 수행자는 마침내 인간의 한계를 아득히 뛰어넘는 팔대성취라는 여덟 가지 위대한 위력을 얻게 돼. 이것은 마치 게임 속 캐릭터가 모든 퀘스트를 완료하고 최종 영웅으로 진화하여 하늘을 날거나 공간을 이동하는 특별한 능력을 얻는 것과 비슷해. 이 거대한 힘들은 단순히 개인의 능력을 뽐내기 위함이 아니라, 더 많은 중생을 고통에서 완벽하게 구원해 주기 위해 자연스럽게 주어지는 우주의 위대한 선물이야.</text:span><text:span/></text:p>
      <text:p text:style-name="P1128"><text:span text:style-name="T1756">📝 핵심 요약</text:span><text:span/></text:p>
      <text:list text:style-name="WWNum61" text:continue-numbering="true">
        <text:list-item>
          <text:p text:style-name="P1129"><text:span text:style-name="T1757">진언은 마음의 잠재력을 깨우고 강력한 영적 변화를 이끌어내는 마스터키와 같다.</text:span><text:span/></text:p>
        </text:list-item>
        <text:list-item>
          <text:p text:style-name="P1130"><text:span text:style-name="T1758">재앙을 가라앉히는 식멸과 지혜를 늘리는 증익 등 네 가지 사업을 통해 삶을 정화한다.</text:span><text:span/></text:p>
        </text:list-item>
        <text:list-item>
          <text:p text:style-name="P1131"><text:span text:style-name="T1759">소망을 채워주는 보병의 성취는 내외면의 모든 필요를 완벽하게 충족하는 경지다.</text:span><text:span/></text:p>
        </text:list-item>
        <text:list-item>
          <text:p text:style-name="P1132"><text:span text:style-name="T1760">팔대성취의 위대한 힘은 중생을 구원하기 위해 한계를 뛰어넘는 영적 능력을 뜻한다.</text:span><text:span/></text:p>
        </text:list-item>
      </text:list>
      <text:p text:style-name="P1133"><text:span><text:soft-page-break/></text:span><text:span/><text:span/></text:p>
      <text:p text:style-name="P1134"><text:span text:style-name="T1761">[🟢 Online Mode | 26.06.08_14:15:30]</text:span><text:span/></text:p>
      <text:p text:style-name="P1135"><text:span text:style-name="T1762">61. 밀교수행으로 진입하는 빠르고 효율적인 지름길</text:span><text:span/></text:p>
      <text:p text:style-name="P1136"><text:span text:style-name="T1763">🔑 핵심 키워드: 보리자량 원만, 사속과 행속, 밀주행, 신속한 성취</text:span><text:span/></text:p>
      <text:p text:style-name="P1137"><text:span text:style-name="T1764">🚀 쉽고 빠르게 목적지에 도달하는 영적 하이패스</text:span><text:span/></text:p>
      <text:p text:style-name="P1138"><text:span text:style-name="T1765">깨달음이라는 거대한 정상에 오르기 위해 필요한 공덕과 지혜의 에너지를 쉽고 빠르게 채우고 싶어 하는 수행자들을 위한 안내서야. 보통 걸어서 산을 오르면 엄청난 시간과 체력이 소모되지만, 고속 열차나 케이블카를 타면 순식간에 정상 근처까지 안전하게 도달할 수 있잖아. 이 게송은 윤회의 고통을 하루빨리 벗어나 중생들을 구제하고 싶어 하는 이들에게 가장 효율적이고 역동적인 영적 하이패스를 제안하고 있어.</text:span><text:span/></text:p>
      <text:p text:style-name="P1139"><text:span text:style-name="T1766">🎒 깨달음의 배낭을 채우는 지혜와 복덕의 자량</text:span><text:span/></text:p>
      <text:p text:style-name="P1140"><text:span text:style-name="T1767">여기서 말하는 보리자량은 먼 길을 떠나는 우주 비행사가 배낭 속에 든든하게 챙겨야 할 필수 비상식량이나 산소통과 같은 거야. 깨달음을 이루려면 엄청난 양의 복덕과 지혜가 필요한데, 이를 일반적인 방법으로만 채우려면 수많은 생을 반복하며 지난한 과정을 거쳐야 하지. 하지만 밀교라는 특수한 방식을 활용하면 이 영적 자산들을 아주 밀도 높고 원만하게, 그리고 지혜롭게 축적할 수 있는 특별한 길이 열리게 돼.</text:span><text:span/></text:p>
      <text:p text:style-name="P1141"><text:span text:style-name="T1768">📜 입문자를 위한 기초 설계도, 사속과 행속</text:span><text:span/></text:p>
      <text:p text:style-name="P1142"><text:span text:style-name="T1769">그 구체적인 방법으로 사속과 행속이라는 초기 단계의 딴뜨라 가르침들이 등장해. 이것은 마치 우리가 대학교에서 전공 심화 과정을 깊이 배우기 전에, 반드시 이수해야 하는 필수 기초 훈련 과정과 아주 비슷해. 외적인 청결과 의식을 중시하는 사속, 그리고 내적인 명상과 외적 행동의 균형을 맞추는 행속을 통해 미세한 에너지의 세계로 들어갈 단단한 기초 체력을 기르는 거지.</text:span><text:span/></text:p>
      <text:p text:style-name="P1143"><text:span text:style-name="T1770">🔑 신비로운 밀주행의 세계로 나아가는 문</text:span><text:span/></text:p>
      <text:p text:style-name="P1144"><text:span text:style-name="T1771">만약 네가 이처럼 깊고 신비로운 비밀 주문의 실천인 밀주행을 본격적으로 닦기를 원한다면, 이제 평범한 수행의 차원을 넘어 한 단계 더 높은 차원의 문을 열어야 해. 최고 보안 등급의 연구소에 진입하기 위해 특수 출입증을 발급받는 것처럼, 스승의 올바른 인도 아래 밀교의 독특한 시스템을 받아들일 준비를 하는 순간이지. 이 강력한 도구를 쥐는 순간부터 수행자의 내면 성장 속도는 이전과는 비교할 수 없을 정도로 엄청나게 빨라지게 될 거야.</text:span><text:span/></text:p>
      <text:p text:style-name="P1145"><text:span text:style-name="T1772">📝 핵심 요약</text:span><text:span/></text:p>
      <text:list text:style-name="WWNum62" text:continue-numbering="true">
        <text:list-item>
          <text:p text:style-name="P1146"><text:span text:style-name="T1773">깨달음에 필요한 공덕과 지혜인 보리자량을 쉽고 빠르게 채우고자 하는 원력임.</text:span><text:span/></text:p>
        </text:list-item>
        <text:list-item>
          <text:p text:style-name="P1147"><text:span text:style-name="T1774">일반적인 수행보다 훨씬 신속하게 목적지에 도달할 수 있는 영적 지름길을 제시함.</text:span><text:span/></text:p>
        </text:list-item>
        <text:list-item>
          <text:p text:style-name="P1148"><text:span text:style-name="T1775">사속과 행속은 밀교 수행의 기초가 되는 초기 단계의 딴뜨라 가르침임.</text:span><text:span/></text:p>
        </text:list-item>
        <text:list-item>
          <text:p text:style-name="P1149"><text:span text:style-name="T1776">신비로운 밀주행을 통해 미세한 에너지를 다스리고 영적 성장을 극대화하려는 고도의 수행법임.</text:span><text:span/></text:p>
        </text:list-item>
      </text:list>
      <text:p text:style-name="P1150"><text:span><text:soft-page-break/></text:span><text:span/><text:span/></text:p>
      <text:p text:style-name="P1151"><text:span text:style-name="T1777">62. 아사리 관정을 위한 스승에 대한 공경과 시봉</text:span><text:span/></text:p>
      <text:p text:style-name="P1152"><text:span text:style-name="T1778">🔑 핵심 키워드: 아사리 관정, 스승 공경, 시봉, 보석 공양, 순종</text:span><text:span/></text:p>
      <text:p text:style-name="P1153"><text:span text:style-name="T1779">🔑 최고의 마스터클래스로 들어가는 비밀 열쇠</text:span><text:span/></text:p>
      <text:p text:style-name="P1154"><text:span text:style-name="T1780">아사리 관정이라는 것은 불교 수행에서 가장 깊고 오묘한 비밀의 가르침을 전수받기 위한 최고 단계의 허가증과 같아. 비유하자면, 전 세계에서 단 한 명뿐인 최고의 명장 밑에서 그 가문의 모든 비밀 레시피를 온전히 물려받는 마스터클래스 입학권 같은 거지. 이 고귀한 관정을 얻기 위해서는 단순히 지식만 배우려는 태도로는 절대 불가능해. 지혜를 온전히 담아낼 수 있도록 먼저 스승과의 깊은 영적 유대감을 형성하고 그 가치를 귀하게 여길 줄 아는 마음가짐이 반드시 </text:span><text:span text:style-name="T1781">필요하단다.</text:span><text:span/></text:p>
      <text:p text:style-name="P1155"><text:span text:style-name="T1782">🙇‍♂️ 온 마음을 다한 정성스러운 시봉</text:span><text:span/></text:p>
      <text:p text:style-name="P1156"><text:span text:style-name="T1783">스승을 기쁘게 해드리는 첫 번째 방법은 정성스러운 시봉과 공경이야. 이것은 비행기를 타기 전에 활주로를 깨끗하게 정돈하는 것처럼, 깊은 지혜가 내 마음속에 안전하게 착륙할 수 있도록 주변 환경과 내 마음을 맑게 닦는 청소 과정과 같아. 스승의 곁에서 일상적인 필요를 세심하게 살피고 진심으로 존경하는 태도를 보여드릴 때, 스승의 마음 문이 활짝 열리게 되지. 겉치레가 아니라 진심에서 우러나오는 행동을 통해 내면의 오만함을 낮추고 배움을 받아들일 완벽한 그릇</text:span><text:span text:style-name="T1784">을 준비하는 단계야.</text:span><text:span/></text:p>
      <text:p text:style-name="P1157"><text:span text:style-name="T1785">💎 가장 소중한 것을 아낌없이 바치는 마음</text:span><text:span/></text:p>
      <text:p text:style-name="P1158"><text:span text:style-name="T1786">두 번째는 자신이 가진 보석 등 귀한 것들을 아낌없이 올리는 공양의 실천이야. 이것은 물질적인 대가를 지불한다는 뜻이 아니라, 내 안의 가장 소중한 집착을 내려놓겠다는 다짐의 표시이지. 마치 가뭄으로 바짝 마른 대지에 단비를 내리기 위해 소중히 아껴둔 정제수를 아낌없이 붓는 것처럼, 내가 가장 아끼는 것을 스승과 법을 위해 기꺼이 내어놓을 때 비로소 내면의 인색함과 탐욕이 떨어져 나가게 돼. 가장 가치 있는 지혜를 얻기 위해 내 삶의 거친 집착들을 스스로</text:span><text:span text:style-name="T1787"> 비워내는 아름다운 결단이란다.</text:span><text:span/></text:p>
      <text:p text:style-name="P1159"><text:span text:style-name="T1788">👣 스승의 발자국을 그대로 따르는 순종</text:span><text:span/></text:p>
      <text:p text:style-name="P1160"><text:span text:style-name="T1789">가장 결정적이고 중요한 마지막 방법은 바로 스승의 말씀과 가르침을 일상에서 그대로 실천하고 행하는 일이야. 아무리 훌륭한 내비게이션이 경로를 알려주어도 운전자가 핸들을 돌리지 않으면 목적지에 갈 수 없는 것처럼, 스승의 가르침을 내 생각대로 재단하지 않고 온전히 믿고 따르는 순종이 핵심이지. 말씀하신 대로 행동하고 삶을 변화시켜 나갈 때, 스승은 제자가 진정으로 법을 이어받을 준비가 되었음을 알고 가장 깊은 비밀의 지혜인 아사리 관정을 기쁜 마음으로 내려</text:span><text:span text:style-name="T1790">주시게 돼.</text:span><text:span/></text:p>
      <text:p text:style-name="P1161"><text:span text:style-name="T1791">📝 핵심 요약</text:span><text:span/></text:p>
      <text:list text:style-name="WWNum63" text:continue-numbering="true">
        <text:list-item>
          <text:p text:style-name="P1162"><text:span text:style-name="T1792">아사리 관정은 비밀법문을 전수받기 위해 반드시 얻어야 하는 최고 단계의 허가증이다.</text:span><text:span/></text:p>
        </text:list-item>
        <text:list-item>
          <text:p text:style-name="P1163"><text:span text:style-name="T1793">정성스러운 시봉과 공경은 내면의 오만함을 낮추고 지혜를 담을 그릇을 훈련하는 과정이다.</text:span><text:span/></text:p>
        </text:list-item>
        <text:list-item>
          <text:p text:style-name="P1164"><text:span text:style-name="T1794">귀한 보석을 바치는 공양은 마음속 가장 깊은 집착과 인색함을 스스로 비워내는 다짐이다.</text:span><text:span/></text:p>
        </text:list-item>
        <text:list-item>
          <text:p text:style-name="P1165"><text:span text:style-name="T1795">스승의 가르침과 밀접하게 일치하도록 말씀대로 행하는 순종이 관정을 얻는 가장 결정적인 열쇠다.</text:span><text:span/></text:p>
        </text:list-item>
      </text:list>
      <text:p text:style-name="P1166"><text:span><text:soft-page-break/></text:span><text:span/><text:span/></text:p>
      <text:p text:style-name="P1167"><text:span text:style-name="T1796">[🔴 Offline Mode | 26.06.08_14:15:01]</text:span><text:span/></text:p>
      <text:p text:style-name="P1168"><text:span text:style-name="T1797">63. 스승의 기쁨과 금강아사리 관정의 위대한 가치</text:span><text:span/></text:p>
      <text:p text:style-name="P1169"><text:span text:style-name="T1798">🔑 핵심 키워드: 스승의 환희, 금강아사리 관정, 죄장 정화, 성취 수증, 영적 복분</text:span><text:span/></text:p>
      <text:p text:style-name="P1170"><text:span text:style-name="T1799">💝 스승의 기쁨에서 시작되는 비밀스러운 전수</text:span><text:span/></text:p>
      <text:p text:style-name="P1171"><text:span text:style-name="T1800">밀교 수행의 가장 깊은 문으로 들어가기 위해 가장 먼저 선행되어야 하는 것은 바로 스승님을 진심으로 기쁘게 해드리는 일이야. 여기서 스승을 환희하게 한다는 것은 단순한 아첨이나 물질적인 공양이 아니라, 제자가 진정한 깨달음의 열망을 품고 가르침을 온전히 따를 때 일어나는 영적인 공명을 뜻한단다. 마치 아주 맑고 깨끗한 거울을 스승의 자비로운 마음 앞에 똑바로 비추었을 때, 그 거울을 통해 위대한 가르침의 빛이 온전히 반사되어 제자의 내면으로 스며드는 것과</text:span><text:span text:style-name="T1801"> 같은 이치지. 스승의 마음이 기쁨으로 활짝 열릴 때, 비로소 세속의 지식과는 차원이 다른 밀교의 깊은 비밀이 전수될 준비가 끝난단다.</text:span><text:span/></text:p>
      <text:p text:style-name="P1172"><text:span text:style-name="T1802">👑 금강아사리 관정이라는 영적 왕관</text:span><text:span/></text:p>
      <text:p text:style-name="P1173"><text:span text:style-name="T1803">스승의 환희를 바탕으로 제자는 마침내 완전한 금강아사리의 관정을 수여받는 고귀한 순간을 맞이하게 돼. 관정이라는 것은 단순한 종교적 의식을 넘어, 제자의 머리 위에 가장 청정한 지혜의 물을 부어주어 영적인 왕위를 계승하는 위대한 의식이야. 비유하자면 한 나라의 정당한 왕세자가 수많은 신하들 앞에서 왕관을 머리에 쓰고 정식으로 왕위에 오르는 대관식과 아주 비슷하단다. 이 관정을 통해 제자는 평범한 범부의 신분을 벗어나, 우주의 진리를 다스리고 다른 생명체들</text:span><text:span text:style-name="T1804">을 구제할 수 있는 영적인 권능과 자격을 정식으로 부여받게 되는 거란다.</text:span><text:span/></text:p>
      <text:p text:style-name="P1174"><text:span text:style-name="T1805">🧼 모든 죄장을 씻어내는 투명한 정화의 힘</text:span><text:span/></text:p>
      <text:p text:style-name="P1175"><text:span text:style-name="T1806">이 신성한 관정의 빛이 제자의 존재 전체를 감싸 안으면, 수많은 과거 생 동안 켜켜이 쌓여온 모든 죄업과 어두운 장애들이 순식간에 정화되는 기적이 일어나. 우리가 아무리 오랜 세월 동안 굳게 닫아두어 먼지가 가득하고 칠흑처럼 어두웠던 깊은 동굴이라 할지라도, 횃불 하나를 들고 안으로 들어가는 순간 그 오랜 어둠이 흔적도 없이 사라지는 것과 똑같아. 관정의 에너지가 영혼의 가장 깊은 구석까지 깨끗하게 청소해 주기 때문에, 마음에 얼룩져 있던 부정적인 카르마</text:span><text:span text:style-name="T1807">의 찌꺼기들이 하얀 눈이 녹아내리듯 완벽하게 씻겨 나가며 의식은 본래의 투명함을 되찾게 되지.</text:span><text:span/></text:p>
      <text:p text:style-name="P1176"><text:span text:style-name="T1808">💎 신성한 성취를 수증하는 위대한 복분</text:span><text:span/></text:p>
      <text:p text:style-name="P1177"><text:span text:style-name="T1809">모든 죄장이 깨끗하게 정화된 제자는 이제 우주가 지닌 모든 신비로운 성취들을 자신의 몸과 마음에 직접 증득할 수 있는 온전한 자격과 복분을 갖추게 된단다. 깨달음의 씨앗을 뿌리기에 가장 완벽하고 비옥한 영적인 토양이 완성된 셈이야. 자갈과 잡초로 가득했던 황무지를 완벽하게 갈아엎고 기름진 흙으로 가꾼 뒤에 좋은 씨앗을 심으면 머지않아 엄청난 열매들이 주렁주렁 열리는 것처럼 말이지. 관정을 통해 정화된 존재는 수행을 하는 족족 위대한 성취를 이루어내어, 마</text:span><text:span text:style-name="T1810">침내 스스로가 완전한 부처의 상태로 거듭날 수 있는 신성한 가능성을 완전히 꽃피우게 된단다.</text:span><text:span/></text:p>
      <text:p text:style-name="P1178"><text:span text:style-name="T1811">📝 핵심 요약</text:span><text:span/></text:p>
      <text:list text:style-name="WWNum64" text:continue-numbering="true">
        <text:list-item>
          <text:p text:style-name="P1179"><text:span text:style-name="T1812">스승을 진심으로 기쁘게 함으로써 밀교의 깊은 전수를 받을 영적 공명이 준비됨</text:span><text:span/></text:p>
        </text:list-item>
        <text:list-item>
          <text:p text:style-name="P1180"><text:span text:style-name="T1813">완전한 금강아사리 관정을 통해 평범한 신분을 초월하는 영적인 권능을 부여받음</text:span><text:span/></text:p>
        </text:list-item>
        <text:list-item>
          <text:p text:style-name="P1181"><text:span text:style-name="T1814">신성한 관정의 의식을 통해 과거 생의 모든 죄업과 어두운 장애가 깨끗이 정화됨</text:span><text:span/></text:p>
        </text:list-item>
        <text:list-item>
          <text:p text:style-name="P1182"><text:span text:style-name="T1815">죄장이 사라진 맑은 영혼 위에 우주의 모든 성취를 증득할 온전한 복분을 구족함</text:span><text:span/></text:p>
        </text:list-item>
      </text:list>
      <text:p text:style-name="P1183"><text:span><text:soft-page-break/></text:span><text:span/><text:span/></text:p>
      <text:p text:style-name="P1184"><text:span text:style-name="T1816">64. 범행자의 청정한 계율과 관정의 제한</text:span><text:span/></text:p>
      <text:p text:style-name="P1185"><text:span text:style-name="T1817">🔑 핵심 키워드: 범행자, 시륜본초불속, 비밀관정, 반야지관정, 계율 보호</text:span><text:span/></text:p>
      <text:p text:style-name="P1186"><text:span text:style-name="T1818">🚫 청정한 독신 수행자를 위한 엄격한 제한</text:span><text:span/></text:p>
      <text:p text:style-name="P1187"><text:span text:style-name="T1819">출가하여 순수한 독신의 삶을 살아가는 범행자들은 밀교의 고위 단계인 비밀관정과 반야지관정을 받아서는 안 된다는 아주 명확한 선이 그어지는 단계야. 이는 마치 온 힘을 다해 체중을 철저히 관리하는 복싱 선수가 갑자기 무거운 근육을 키워야 하는 역도 선수의 식단과 특수 훈련법을 무작정 따라 하면 안 되는 것과 같단다. 각자의 역할과 목적에 맞는 규칙이 따로 있듯이, 독신의 서원을 지키는 수행자에게는 그 청정함을 완벽하게 보호하기 위한 특별한 울타리가 필요한 </text:span><text:span text:style-name="T1820">셈이지.</text:span><text:span/></text:p>
      <text:p text:style-name="P1188"><text:span text:style-name="T1821">📜 시륜본초불속의 최고 권위와 경고</text:span><text:span/></text:p>
      <text:p text:style-name="P1189"><text:span text:style-name="T1822">이러한 제한은 스승의 개인적인 의견이 아니라, 밀교에서 가장 높은 권위를 가진 경전인 시륜본초불속에서 아주 적극적으로 저지하고 있는 절대적인 규칙이야. 가전제품을 안전하게 오래 쓰려면 제조사가 만든 공식 가이드북의 경고 문구를 반드시 지켜야 하잖아. "이 장치는 특정 환경에서 절대 구동하지 마십시오"라는 본초불의 강력한 가이드라인을 따르는 것이야말로, 영적 성장의 궤도에서 이탈하지 않는 가장 지혜롭고 안전한 지름길이란다.</text:span><text:span/></text:p>
      <text:p text:style-name="P1190"><text:span text:style-name="T1823">🛡️ 서원의 충돌 방지와 청정함의 유지</text:span><text:span/></text:p>
      <text:p text:style-name="P1191"><text:span text:style-name="T1824">비밀관정과 반야지관정의 실제 수행 과정에는 독신 수행자의 가장 근본적인 서원인 출가 계율과 표면적으로 충돌할 수 있는 미세한 에너지 결합 요소가 포함되어 있어. 고전압으로 작동하는 정밀 장치에 맞지 않는 규격의 케이블을 억지로 연결하면 시스템 전체가 과부하로 타버릴 수 있는 위험과 비슷하지. 자신이 굳게 세운 소중한 서원을 온전히 보호하면서도 대승의 지혜를 증장시키기 위해, 에너지의 주파수가 다른 관정을 지혜롭게 피해 가는 구조적인 장치야.</text:span><text:span/></text:p>
      <text:p text:style-name="P1192"><text:span text:style-name="T1825">🎯 역할에 맞는 여법한 수행의 길</text:span><text:span/></text:p>
      <text:p text:style-name="P1193"><text:span text:style-name="T1826">결국 이 가르침은 수행자를 차별하거나 가두려는 게 아니라, 각자가 가진 고유한 수행의 그릇과 환경에서 최고의 효율을 내도록 도와주려는 자비로운 배려야. 기차는 철길 위에서 가장 빠르고, 자동차는 도로 위에서 가장 안전하게 달릴 수 있는 법이니까. 자신의 청정한 삶의 형태를 있는 그대로 존중하면서 그 안에서 닦을 수 있는 여법한 방편을 선택할 때, 우리는 아무런 장애 없이 내면의 본성을 가장 아름답고 단단하게 완성할 수 있게 돼.</text:span><text:span/></text:p>
      <text:p text:style-name="P1194"><text:span text:style-name="T1827">📝 핵심 요약</text:span><text:span/></text:p>
      <text:list text:style-name="WWNum65" text:continue-numbering="true">
        <text:list-item>
          <text:p text:style-name="P1195"><text:span text:style-name="T1828">출가하여 독신의 청정 계율을 지키는 범행자는 밀교의 비밀관정과 반야지관정을 받지 말아야 해.</text:span><text:span/></text:p>
        </text:list-item>
        <text:list-item>
          <text:p text:style-name="P1196"><text:span text:style-name="T1829">이 규칙은 밀교의 최고 권위 경전인 시륜본초불속에서 적극적으로 금지한 절대적인 가이드라인이야.</text:span><text:span/></text:p>
        </text:list-item>
        <text:list-item>
          <text:p text:style-name="P1197"><text:span text:style-name="T1830">독신 서원과 고위 관정의 수행 방식이 서로 충돌하여 수행의 기반이 무전되는 것을 방지하려는 구조적 보호 조치야.</text:span><text:span/></text:p>
        </text:list-item>
        <text:list-item>
          <text:p text:style-name="P1198"><text:span text:style-name="T1831">각자의 수행 환경과 그릇에 맞는 여법한 방편을 따를 때, 계율을 깨뜨리지 않고 안전하게 궁극의 깨달음으로 나아갈 수 있어.</text:span><text:span/></text:p>
        </text:list-item>
      </text:list>
      <text:p text:style-name="P1199"><text:span><text:soft-page-break/></text:span><text:span/><text:span/></text:p>
      <text:p text:style-name="P1200"><text:span text:style-name="T1832">[🟢 Online Mode | 26.06.08_14:16:00]</text:span><text:span/></text:p>
      <text:p text:style-name="P1201"><text:span text:style-name="T1833">65. 계율의 가치와 관정의 충돌</text:span><text:span/></text:p>
      <text:p text:style-name="P1202"><text:span text:style-name="T1834">🔑 핵심 키워드: 관정, 범행, 금계, 율의, 청정</text:span><text:span/></text:p>
      <text:p text:style-name="P1203"><text:span text:style-name="T1835">🛡️ 청정한 삶을 지키는 든든한 보호막</text:span><text:span/></text:p>
      <text:p text:style-name="P1204"><text:span text:style-name="T1836">수행자가 세속의 욕망을 내려놓고 청정한 삶을 살겠다고 다짐하는 것은 인생의 아주 특별한 규칙을 세우는 일이야. 불교에서는 이를 범행이나 난행의 율의라고 부르는데, 스스로를 제어하는 단단한 성벽과 같지. 마치 중요한 시험을 앞두고 스마트폰 앱을 모두 차단해 주는 집중 모드를 켜는 것과 비슷해. 외부의 유혹을 원천 봉쇄하여 오롯이 마음에 집중할 수 있도록 도와주는 안전한 보호막인 셈이야.</text:span><text:span/></text:p>
      <text:p text:style-name="P1205"><text:span text:style-name="T1837">⚡ 높은 차원의 관정과 예기치 못한 충돌</text:span><text:span/></text:p>
      <text:p text:style-name="P1206"><text:span text:style-name="T1838">하지만 더 깊고 높은 차원의 비밀스러운 의식인 특정 관정을 무턱대고 받으려고 할 때 예상치 못한 문제가 생길 수 있어. 어떤 관정은 일반적인 독신 수행자가 절대로 해서는 안 되는 행동을 요구하기도 하거든. 이것은 마치 절대 채식을 하겠다고 굳게 약속한 사람이, 몸에 아무리 좋은 명약이라 할지라도 고기 성분이 들어간 음식을 섭취해야 하는 상황을 마주하는 것과 같아. 두 가지 훌륭한 가치가 정면으로 충돌하는 묘한 상황이지.</text:span><text:span/></text:p>
      <text:p text:style-name="P1207"><text:span text:style-name="T1839">🛑 선을 넘는 행동과 약속의 붕괴</text:span><text:span/></text:p>
      <text:p text:style-name="P1208"><text:span text:style-name="T1840">경전에서는 독신 수행자가 이런 비밀 관정을 섣불리 받게 되면 결국 금계를 범하게 되어 평생 쌓아온 청정한 계율이 한순간에 깨어질 수 있다고 경고해. 단단하게 묶어두었던 안전벨트가 풀려버리는 상태를 뜻하지. 피자 가게를 열겠다고 계약서에 서명해 놓고 정작 매장 안에서는 햄버거만 만들어 파는 것처럼, 처음에 맺었던 가장 근본적인 약속의 정체성 자체가 완전히 흔들리고 무너지는 결과가 초래되는 거야.</text:span><text:span/></text:p>
      <text:p text:style-name="P1209"><text:span text:style-name="T1841">🧭 내 상황에 맞는 지혜로운 길 선택</text:span><text:span/></text:p>
      <text:p text:style-name="P1210"><text:span text:style-name="T1842">결국 이 게송을 통해 전하고자 하는 메시지는 무조건 높고 화려해 보이는 수행을 쫓아갈 게 아니라, 내 현재 상태와 서원에 맞는 지혜로운 선택을 해야 한다는 점이야. 아무리 최신식 고성능 엔진이라도 내 소형차에 맞지 않으면 엔진과 차체가 둘 다 망가지는 법이잖아. 나에게 주어진 계율과 약속을 소중히 지키면서 차근차근 단계를 밟아 나가는 것이야말로, 영혼을 다치지 않게 보호하며 안전하게 성장시키는 진짜 지혜란다.</text:span><text:span/></text:p>
      <text:p text:style-name="P1211"><text:span text:style-name="T1843">📝 핵심 요약</text:span><text:span/></text:p>
      <text:list text:style-name="WWNum66" text:continue-numbering="true">
        <text:list-item>
          <text:p text:style-name="P1212"><text:span text:style-name="T1844">청정한 삶을 지키는 계율은 유혹을 막아주는 안전한 집중 모드와 같다.</text:span><text:span/></text:p>
        </text:list-item>
        <text:list-item>
          <text:p text:style-name="P1213"><text:span text:style-name="T1845">높은 차원의 특정 관정은 독신 수행자가 지켜야 할 규칙과 정면으로 충돌할 수 있다.</text:span><text:span/></text:p>
        </text:list-item>
        <text:list-item>
          <text:p text:style-name="P1214"><text:span text:style-name="T1846">맞지 않는 의식을 무리하게 진행하면 평생 쌓아온 소중한 율의의 기반이 무너지게 된다.</text:span><text:span/></text:p>
        </text:list-item>
        <text:list-item>
          <text:p text:style-name="P1215"><text:span text:style-name="T1847">남의 옷을 탐내지 말고 자신의 현재 위치와 서원에 맞는 지혜로운 수행의 길을 선택해야 한다.</text:span><text:span/></text:p>
        </text:list-item>
      </text:list>
      <text:p text:style-name="P1216"><text:span><text:soft-page-break/></text:span><text:span/><text:span/></text:p>
      <text:p text:style-name="P1217"><text:span text:style-name="T1848">[🟢 Online Mode | 26.06.08_14:15:38]</text:span><text:span/></text:p>
      <text:p text:style-name="P1218"><text:span text:style-name="T1849">66. 계율의 파괴와 성취의 완전한 상실</text:span><text:span/></text:p>
      <text:p text:style-name="P1219"><text:span text:style-name="T1850">🔑 핵심 키워드: 금행자, 바라이죄, 악도 추락, 성취 상실</text:span><text:span/></text:p>
      <text:p text:style-name="P1220"><text:span text:style-name="T1851">🛡️ 서원과 규율을 지키며 수행하는 금행자에게 가장 치명적인 위기는 바로 근본적인 계율을 무너뜨리는 바라이죄를 범하는 일이야. 바라이죄는 밀교 수행의 전반을 송두리째 뒤흔드는 무거운 패배를 의미하는데, 이는 마치 심해를 탐사하던 최첨단 잠수함의 외벽에 작은 균열이 생겨 순식간에 엄청난 수압을 견디지 못하고 침수되는 것과 같아. 아무리 훌륭한 엔진과 장비를 갖추었더라도 중심을 지탱하는 보호막이 깨어지면 그 안의 모든 기능이 한순간에 마비되고 마는 법이지.</text:span><text:span/></text:p>
      <text:p text:style-name="P1221"><text:span text:style-name="T1852">📉 이렇게 근본적인 계율이 파괴되면 의식은 통제력을 완전히 잃고 무거운 업의 인력에 끌려 고통스러운 악도로 무섭게 추락하게 돼. 하늘을 높이 날아가던 비행기가 엔진을 잃어버리는 순간, 공기의 저항을 이겨내지 못하고 중력의 법칙에 따라 지상을 향해 순식간에 곤두박질치는 장면과 아주 똑같아. 번뇌를 다스릴 수 있는 영적인 방어벽이 사라졌기 때문에, 스스로 지은 거친 행동의 결과들이 부메랑이 되어 의식을 가장 어두운 심연으로 이끌고 내려가는 거지.</text:span><text:span/></text:p>
      <text:p text:style-name="P1222"><text:span text:style-name="T1853">🔌 계율을 어기고 악도의 흐름에 휘말린 상태에서는 그 어떤 깊은 명상이나 밀교의 진언 수행을 하더라도 영적인 성취를 결코 이뤄낼 수 없어. 액정이 완전히 산산조각 나고 내부 회로가 타버린 스마트폰에 아무리 최신 소프트웨어를 다운로드하려고 애써봤자 기기가 전혀 작동하지 않는 것과 같은 이치야. 에너지를 담아두고 증폭시킬 수 있는 깨끗한 그릇 자체가 깨어져 버렸기 때문에, 아무리 숭고한 가르침을 들이부어도 밑 빠진 독처럼 모든 공덕이 허무하게 새어나가 버리는</text:span><text:span text:style-name="T1854"> 거지.</text:span><text:span/></text:p>
      <text:p text:style-name="P1223"><text:span text:style-name="T1855">🚀 결국 이 게송은 계율이라는 것이 우리를 구속하는 답답한 감옥이 아니라, 오히려 사후의 혼란과 위험으로부터 우리를 완벽하게 보호해 주는 가장 안전한 우주복이라는 진리를 역설하고 있어. 험난한 우주 공간을 탐사할 때 우주복에 작은 구멍 하나만 나도 생명이 위태로워지듯이, 수행의 길에서 지키는 작은 약속들이야말로 우리 영혼을 단단하게 지켜주는 버팀목이 되어주지. 이 보호막을 소중히 가꾸고 유지할 때 비로소 우리는 안전하게 당생성불이라는 위대한 목적지에 도달</text:span><text:span text:style-name="T1856">할 수 있어.</text:span><text:span/></text:p>
      <text:p text:style-name="P1224"><text:span text:style-name="T1857">📝 핵심 요약</text:span><text:span/></text:p>
      <text:list text:style-name="WWNum67" text:continue-numbering="true">
        <text:list-item>
          <text:p text:style-name="P1225"><text:span text:style-name="T1858">금행자가 근본 계율을 파괴하는 바라이죄를 범하는 것은 수행의 완전한 패배를 의미한다.</text:span><text:span/></text:p>
        </text:list-item>
        <text:list-item>
          <text:p text:style-name="P1226"><text:span text:style-name="T1859">계율의 붕괴는 영적 방어벽을 소멸시켜 의식을 무거운 업의 인력과 악도로 추락하게 만든다.</text:span><text:span/></text:p>
        </text:list-item>
        <text:list-item>
          <text:p text:style-name="P1227"><text:span text:style-name="T1860">청정한 그릇인 계율이 깨어진 상태에서는 그 어떤 밀교적 수행을 하더라도 궁극의 성취를 얻을 수 없다.</text:span><text:span/></text:p>
        </text:list-item>
        <text:list-item>
          <text:p text:style-name="P1228"><text:span text:style-name="T1861">규율은 구속이 아니라 사후 세계의 위험과 번뇌로부터 수행자를 지켜주는 가장 안전한 보호막이다.</text:span><text:span/></text:p>
        </text:list-item>
      </text:list>
      <text:p text:style-name="P1229"><text:span><text:soft-page-break/></text:span><text:span/><text:span/></text:p>
      <text:p text:style-name="P1230"><text:span><text:soft-page-break/></text:span><text:span/><text:span/></text:p>
      <text:p text:style-name="P1231"><text:span text:style-name="T1862">67. 정통 자격과 진리 인식이 가져다주는 수행의 자유</text:span><text:span/></text:p>
      <text:p text:style-name="P1232"><text:span text:style-name="T1863">🔑 핵심 키워드: 아사리 관정, 십진실, 딴뜨라 청문과 강설, 호마와 공시</text:span><text:span/></text:p>
      <text:p text:style-name="P1233"><text:span text:style-name="T1864">📜 영적 면허증, 아사리의 관정과 허여</text:span><text:span/></text:p>
      <text:p text:style-name="P1234"><text:span text:style-name="T1865">깊고 비밀스러운 밀교(딴뜨라) 수행의 세계에 발을 들이기 위해서는 자격을 갖춘 스승으로부터 아사리의 관정과 공식적인 허락을 받는 과정이 반드시 필요해. 이것은 마치 복잡하고 위험한 대형 중장비를 운전하기 전에 국가에서 공인한 전문 면허증을 취득하는 것과 아주 똑같단다. 정당한 자격증 없이 기계를 만지면 큰 사고가 나지만, 엄격한 시험을 거쳐 면허를 얻은 전문가가 운전대를 잡으면 아무런 문제 없이 안전하고 능숙하게 목적지까지 도달할 수 있는 것과 같은 이치</text:span><text:span text:style-name="T1866">야.</text:span><text:span/></text:p>
      <text:p text:style-name="P1235"><text:span text:style-name="T1867">🧩 시스템을 꿰뚫어 보는 전문 지식, 십진실</text:span><text:span/></text:p>
      <text:p text:style-name="P1236"><text:span text:style-name="T1868">관정을 받는 것만큼이나 중요한 것은 존재와 수행의 본질을 완벽하게 이해하는 십진실(十眞實)의 지혜를 갖추는 일이야. 이것은 최첨단 컴퓨터를 조작하는 엔지니어가 단순히 버튼 몇 개만 다룰 줄 아는 게 아니라, 기기 내부의 복잡한 회로도와 운영체제의 메커니즘을 완벽하게 꿰뚫고 있는 상태를 뜻해. 신비로운 의식 뒤에 숨겨진 진리의 시스템을 정확하게 알고 있어야만, 겉으로 보이는 의식에 매몰되지 않고 온전한 깨달음의 도구로 다룰 수 있게 되지.</text:span><text:span/></text:p>
      <text:p text:style-name="P1237"><text:span text:style-name="T1869">📣 당당하고 허물없는 진리의 청문과 강설</text:span><text:span/></text:p>
      <text:p text:style-name="P1238"><text:span text:style-name="T1870">정통 면허증(관정)과 전문 지식(십진실)이라는 두 가지 완벽한 요건을 갖춘 수행자는 비로소 모든 딴뜨라 법문을 듣고 남들에게 명쾌하게 해설해 줄 수 있는 대자유를 얻게 돼. 정부의 정식 허가를 받은 방송국이 아무런 제약 없이 맑고 깨끗한 전파를 온 세상에 당당하게 송출하는 풍경을 떠올려봐. 법을 가르치고 배우는 과정에서 생길 수 있는 미혹이나 오해라는 무서운 덫에 걸리지 않고, 순수한 진리의 흐름을 거침없이 이끌어갈 수 있는 당당한 자격이 주어지는 셈이지</text:span><text:span text:style-name="T1871">.</text:span><text:span/></text:p>
      <text:p text:style-name="P1239"><text:span text:style-name="T1872">🔥 안전하게 다루는 신비로운 불길, 호마와 공시</text:span><text:span/></text:p>
      <text:p text:style-name="P1240"><text:span text:style-name="T1873">자격을 갖춘 지혜로운 수행자가 행하는 호마(불교식 불 의식)와 수많은 공양 의식들은 그 어떤 부작용이나 영적인 허물도 남기지 않아. 불을 전혀 다룰 줄 모르는 아이가 가스레인지를 만지면 온 집안을 태워 먹는 대형 화재로 이어지지만, 세계 최고의 마스터 셰프가 화려한 불쇼를 선보이며 요리할 때는 우리에게 최고의 풍미를 자랑하는 음식을 안전하게 선물하잖아. 이처럼 신비롭고 강력한 밀교의 에너지를 다루더라도, 내면의 청정한 자격과 지혜가 뒷받침된다면 오직 중생</text:span><text:span text:style-name="T1874">을 구제하고 공덕을 쌓는 위대한 연금술로만 작용하게 된단다.</text:span><text:span/></text:p>
      <text:p text:style-name="P1241"><text:span text:style-name="T1875">📝 핵심 요약</text:span><text:span/></text:p>
      <text:list text:style-name="WWNum68" text:continue-numbering="true">
        <text:list-item>
          <text:p text:style-name="P1242"><text:span text:style-name="T1876">밀교의 깊은 수행을 행하기 위해서는 스승으로부터 전수받는 아사리의 관정이 필수적임.</text:span><text:span/></text:p>
        </text:list-item>
        <text:list-item>
          <text:p text:style-name="P1243"><text:span text:style-name="T1877">의식의 본질과 구조를 완벽하게 꿰뚫어 보는 십진실의 전문 지식을 함께 갖추어야 함.</text:span><text:span/></text:p>
        </text:list-item>
        <text:list-item>
          <text:p text:style-name="P1244"><text:span text:style-name="T1878">자격과 지혜를 갖춘 수행자가 가르침을 듣고 널리 전하는 것에는 그 어떤 허물도 없음.</text:span><text:span/></text:p>
        </text:list-item>
        <text:list-item>
          <text:p text:style-name="P1245"><text:span text:style-name="T1879">호마나 공양 같은 강력한 의식도 전문가의 손길을 거치면 부작용 없이 거대한 공덕으로 승화됨.</text:span><text:span/></text:p>
        </text:list-item>
      </text:list>
      <text:p text:style-name="P1246"><text:span><text:soft-page-break/></text:span><text:span/><text:span/></text:p>
      <text:p text:style-name="P1247"><text:span text:style-name="T1880">68. 위대한 가르침의 결실과 보리의 길 요약</text:span><text:span/></text:p>
      <text:p text:style-name="P1248"><text:span text:style-name="T1881">🔑 핵심 키워드: 길상연등지, 장춥외, 보리의 길, 토링 사원</text:span><text:span/></text:p>
      <text:p text:style-name="P1249"><text:span text:style-name="T1882">📜 방대한 성전의 정수를 모아 만든 등불</text:span><text:span/></text:p>
      <text:p text:style-name="P1250"><text:span text:style-name="T1883">대장로 아티샤, 즉 길상연등지 존자는 수많은 계경과 경전 속에 흩어져 있던 방대한 부처님의 가르침을 남김없이 살피고 이 논서를 완성했어. 이건 마치 수천 권으로 이루어진 거대한 도서관의 핵심 지식들을 단 한 권의 포켓북이나 요약노트로 압축해 놓은 것과 같아. 온갖 지혜의 에센스만을 쏙쏙 골라내어 복잡한 세상 속에서 방황하는 중생들이 언제든 쉽게 꺼내 볼 수 있는 맑은 등불을 켜준 셈이지.</text:span><text:span/></text:p>
      <text:p text:style-name="P1251"><text:span text:style-name="T1884">👑 간절한 청으로 열린 지혜의 문</text:span><text:span/></text:p>
      <text:p text:style-name="P1252"><text:span text:style-name="T1885">이 위대한 요약서가 세상에 나올 수 있었던 결정적인 계기는 출가법왕 장춥외의 간절한 청이 있었기 때문이야. 백성들을 진정으로 사랑했던 한 지도자가 영적인 갈증을 해결하기 위해 위대한 스승에게 길을 물었고, 그에 응답하여 최고의 지혜가 펼쳐진 거지. 마치 어두운 밤길을 헤매던 여행자가 등대지기에게 간절히 불을 켜달라고 요청하자, 등대지기가 온 바다를 환하게 비추는 강력한 불빛을 마침내 쏘아 올린 것과 완전히 똑같은 이치야.</text:span><text:span/></text:p>
      <text:p text:style-name="P1253"><text:span text:style-name="T1886">🛕 토링 사원에서 완성된 번역과 검증</text:span><text:span/></text:p>
      <text:p text:style-name="P1254"><text:span text:style-name="T1887">아티샤 존자는 토링 사원에 머물며 위대한 역경가 게외 로드로와 함께 이 텍스트를 정교하게 번역하고 교정하는 작업을 완수했어. 인도와 티베트를 대표하는 두 명의 위대한 마스터가 머리를 맞대고 글자 하나, 문장 하나의 의미를 완벽하게 검증해 낸 거야. 거친 원석을 두 명의 장인이 오랜 시간 정성스럽게 깎고 다듬어서 마침내 단 하나의 흠집도 없는 눈부신 다이아몬드로 탄생시킨 과정이라고 이해하면 돼.</text:span><text:span/></text:p>
      <text:p text:style-name="P1255"><text:span text:style-name="T1888">🗺️ 깨달음의 전 과정을 담은 완벽한 내비게이션</text:span><text:span/></text:p>
      <text:p text:style-name="P1256"><text:span text:style-name="T1889">결국 이 마지막 게송이 보여주는 것은 우리를 성불로 인도하는 보리의 길이 결코 멀리 있는 신비가 아니라, 누구나 따라갈 수 있도록 잘 정리된 완벽한 안내서라는 사실이야. 이 가르침을 마음에 새기고 묵묵히 걸어가다 보면, 비록 중간에 조금 흔들리거나 넘어지더라도 우리의 내면이 더 깊은 지혜의 방향으로 단단하게 재편성되는 걸 경험할 수 있어. 시공간을 초월해 수많은 수행자들을 구원해 온 최고의 영적 내비게이션을 손에 쥔 채, 이제 우리는 흔들림 없이 다음 단</text:span><text:span text:style-name="T1890">계로 나아갈 수 있는 강력한 힘을 얻게 된 거지.</text:span><text:span/></text:p>
      <text:p text:style-name="P1257"><text:span text:style-name="T1891">📝 핵심 요약</text:span><text:span/></text:p>
      <text:list text:style-name="WWNum69" text:continue-numbering="true">
        <text:list-item>
          <text:p text:style-name="P1258"><text:span text:style-name="T1892">대장로 아티샤가 방대한 계경과 경전의 핵심을 완벽하게 요약하여 논서를 완성함</text:span><text:span/></text:p>
        </text:list-item>
        <text:list-item>
          <text:p text:style-name="P1259"><text:span text:style-name="T1893">출가법왕 장춥외의 간절한 간청이 계기가 되어 보리의 길을 밝히는 등불이 세상에 나옴</text:span><text:span/></text:p>
        </text:list-item>
        <text:list-item>
          <text:p text:style-name="P1260"><text:span text:style-name="T1894">토링 사원에서 아티샤 존자와 역경가 게외 로드로가 함께 정교한 번역과 교정 작업을 거침</text:span><text:span/></text:p>
        </text:list-item>
        <text:list-item>
          <text:p text:style-name="P1261"><text:span text:style-name="T1895">이 가르침은 수행자들이 성불에 이를 때까지 길을 잃지 않도록 돕는 완벽한 영적 내비게이션임</text:span><text:span/></text:p>
        </text:list-item>
      </text:list>
      <text:p text:style-name="P1262"><text:span><text:soft-page-break/></text:span><text:span/><text:span/></text:p>
      <text:p text:style-name="P1263"><text:span text:style-name="T1896"/><text:span text:style-name="T1897"/><text:span text:style-name="T1898"/></text:p>
      <text:p text:style-name="P1264"><text:span text:style-name="T1899">[🟢 Online Mode | 26.06.08_14:15:52]</text:span><text:span/></text:p>
      <text:p text:style-name="P1265"><text:span text:style-name="T1900">결어. 보리도등론의 완성과 역사적 전승</text:span><text:span/></text:p>
      <text:p text:style-name="P1266"><text:span text:style-name="T1901">🔑 핵심 키워드: 보리도등론 완결, 길상연등지 아티샤, 선혜 번역사, 토딩 사원</text:span><text:span/></text:p>
      <text:p text:style-name="P1267"><text:span text:style-name="T1902">🕯️ 암흑을 밝히는 등대의 최종 완성</text:span><text:span/></text:p>
      <text:p text:style-name="P1268"><text:span text:style-name="T1903">인류의 정신사에 거대한 이정표를 세운 보리도등론이 위대한 스승인 길상연등지 아티샤의 손을 통해 마침내 온전한 마침표를 찍게 되었어. 비유하자면 거친 폭풍우가 몰아치는 밤바다 한가운데에 배들이 길을 잃지 않고 안전하게 항구로 들어올 수 있도록, 평생을 바쳐 거대하고 단단한 석조 등대를 완벽하게 완공한 것과 같지. 이 짧고 명쾌한 가르침의 등불이 켜짐으로써, 수많은 구도자가 나아갈 길이 영원히 밝혀지게 된 셈이야.</text:span><text:span/></text:p>
      <text:p text:style-name="P1269"><text:span text:style-name="T1904">🤝 국경을 넘어선 두 지혜의 결합</text:span><text:span/></text:p>
      <text:p text:style-name="P1270"><text:span text:style-name="T1905">이 거룩한 가르침은 인도에서 온 위대한 스승과 티베트의 천재적인 역경사인 선혜 비구의 헌신적인 협력을 통해 완벽한 번역과 교정본으로 세상에 나오게 되었어.</text:span><text:span/></text:p>
      <table:table table:style-name="ta10">
        <table:table-columns>
          <table:table-column table:style-name="co27"/>
          <table:table-column table:style-name="co28"/>
          <table:table-column table:style-name="co29"/>
        </table:table-columns>
        <table:table-header-rows>
          <table:table-row table:style-name="ro32" table:default-cell-style-name="ce99">
            <table:table-cell table:style-name="ce100">
              <text:p text:style-name="P1271"><text:span text:style-name="T1906">전승 역할</text:span><text:span/></text:p>
            </table:table-cell>
            <table:table-cell table:style-name="ce101">
              <text:p text:style-name="P1272"><text:span text:style-name="T1907">담당 인물</text:span><text:span/></text:p>
            </table:table-cell>
            <table:table-cell table:style-name="ce102">
              <text:p text:style-name="P1273"><text:span text:style-name="T1908">핵심 기여 내용</text:span><text:span/></text:p>
            </table:table-cell>
          </table:table-row>
        </table:table-header-rows>
        <table:table-row table:style-name="ro33" table:default-cell-style-name="ce99">
          <table:table-cell table:style-name="ce103">
            <text:p text:style-name="P1274"><text:span text:style-name="T1909">원저자 및 감수</text:span><text:span/></text:p>
          </table:table-cell>
          <table:table-cell table:style-name="ce104">
            <text:p text:style-name="P1275"><text:span text:style-name="T1910">길상연등지 아티샤</text:span><text:span/></text:p>
          </table:table-cell>
          <table:table-cell table:style-name="ce105">
            <text:p text:style-name="P1276"><text:span text:style-name="T1911">인도의 순수한 지혜의 원천을 제공하고 전체 흐름을 감수함</text:span><text:span/></text:p>
          </table:table-cell>
        </table:table-row>
        <table:table-row table:style-name="ro34" table:default-cell-style-name="ce99">
          <table:table-cell table:style-name="ce106">
            <text:p text:style-name="P1277"><text:span text:style-name="T1912">번역 및 교정</text:span><text:span/></text:p>
          </table:table-cell>
          <table:table-cell table:style-name="ce107">
            <text:p text:style-name="P1278"><text:span text:style-name="T1913">역경사 선혜 비구</text:span><text:span/></text:p>
          </table:table-cell>
          <table:table-cell table:style-name="ce108">
            <text:p text:style-name="P1279"><text:span text:style-name="T1914">티베트인들이 명확하게 이해할 수 있도록 정확한 언어로 번역함</text:span><text:span/></text:p>
          </table:table-cell>
        </table:table-row>
      </table:table>
      <text:p text:style-name="P1280"><text:span text:style-name="T1915">이 과정은 마치 최고의 비단실을 다루는 두 명의 명장이 힘을 합쳐 한 치의 오차도 없는 완벽한 왕의 의복을 짜내는 과정과 흡사해. 한쪽의 깊은 깨달음과 다른 한쪽의 정밀한 언어적 능력이 결합하여 세대를 뛰어넘을 명작이 탄생한 거지.</text:span><text:span/></text:p>
      <text:p text:style-name="P1281"><text:span text:style-name="T1916">🏔️ 서부 티베트의 심장, 토딩 사원의 영광</text:span><text:span/></text:p>
      <text:p text:style-name="P1282"><text:span text:style-name="T1917">이 위대한 법이 탄생하고 정리된 구체적인 역사적 공간은 바로 구게 왕국 샹슝 지역에 위치한 토딩 사원이야.</text:span><text:span/></text:p>
      <text:list text:style-name="WWNum70" text:continue-numbering="true">
        <text:list-item>
          <text:p text:style-name="P1283"><text:span text:style-name="T1918">지리적 고립성: 문명의 중심지에서 벗어난 척박하고 높은 고원 지대</text:span><text:span/></text:p>
        </text:list-item>
        <text:list-item>
          <text:p text:style-name="P1284"><text:span text:style-name="T1919">영적 가치: 세속의 소음이 완벽하게 차단되어 오직 진리 탐구에만 몰입할 수 있는 최적의 환경</text:span><text:span/></text:p>
        </text:list-item>
        <text:list-item>
          <text:p text:style-name="P1285"><text:span text:style-name="T1920">역사적 의미: 꺼져가던 티베트 불교의 불꽃을 다시 일으켜 세운 부흥의 핵심 기지</text:span><text:span/></text:p>
        </text:list-item>
      </text:list>
      <text:p text:style-name="P1286"><text:span text:style-name="T1921">비유하자면 맑고 깨끗한 생명수가 솟아나는 깊은 산속의 비밀스러운 샘물터와 같아. 가장 험하고 조용한 곳에서 시작된 물줄기가 결국 거대한 강물을 이루어 온 대지를 적시듯, 토딩 사원에서 완성된 이 가르침은 티베트 전역을 구원의 빛으로 물들이게 돼.</text:span><text:span/></text:p>
      <text:p text:style-name="P1287"><text:span text:style-name="T1922">🌸 세상을 향한 마지막 축원, 길상원만</text:span><text:span/></text:p>
      <text:p text:style-name="P1288"><text:span text:style-name="T1923">기록의 맨 마지막을 장식하는 길상원만이라는 짧은 인사는 가르침을 마무리지으며 온 우주의 중생에게 보내는 가장 따뜻하고 거대한 축복의 메시지야. 비유하자면 웅장한 오케스트라의 교향곡이 끝난 뒤에 연주홀 전체를 은은하게 감돌며 청중들의 마음에 깊은 평화를 선물하는 잔잔한 여운과 똑같아. 이 가르침을 접하는 모든 존재가 고통에서 벗어나 마침내 완벽한 행복과 평온을 누리기를 바라는 스승들의 간절한 염원이 담겨 있는 감동적인 마무리야.</text:span><text:span/></text:p>
      <text:p text:style-name="P1289"><text:span text:style-name="T1924">📝 핵심 요약</text:span><text:span/></text:p>
      <text:list text:style-name="WWNum70" text:continue-numbering="true">
        <text:list-item>
          <text:p text:style-name="P1290"><text:span text:style-name="T1925">대아사리 길상연등지 아티샤에 의해 보리도등론의 원본 저술이 최종적으로 완결됨.</text:span><text:span/></text:p>
        </text:list-item>
        <text:list-item>
          <text:p text:style-name="P1291"><text:span text:style-name="T1926">인도의 아티샤와 티베트의 역경사 선혜 비구의 협력으로 정밀한 번역과 교정이 완료됨.</text:span><text:span/></text:p>
        </text:list-item>
        <text:list-item>
          <text:p text:style-name="P1292"><text:span text:style-name="T1927">가르침이 탄생한 역사적 무대는 구게 왕국 샹슝에 위치한 영적인 중심지 토딩 사원임.</text:span><text:span/></text:p>
        </text:list-item>
        <text:list-item>
          <text:p text:style-name="P1293"><text:span text:style-name="T1928">맨 마지막의 길상원만이라는 축원을 통해 모든 중생의 행복과 깨달음을 간절히 염원함.</text:span><text:span/></text:p>
        </text:list-item>
      </text:list>
      <text:p text:style-name="P129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style:tab-stop-distance="35.4pt" fo:margin-top="0pt"/>
      <style:text-properties fo:font-family="Arial" style:font-family-asian="Arial" style:font-family-complex="Arial" fo:font-size="11pt" style:font-size-complex="11pt" fo:language="en" style:language-complex="ar" fo:country="US" style:country-complex="SA"/>
    </style:default-style>
    <style:default-style style:family="text">
      <style:text-properties fo:font-family="Arial" style:font-family-asian="Arial" style:font-family-complex="Arial" fo:font-size="11pt" style:font-size-complex="11pt" fo:language="en" style:language-complex="ar" fo:country="US" style:country-complex="SA"/>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908" style:display-name="Heading 1" style:family="paragraph" style:name="849">
      <style:paragraph-properties fo:margin-top="18pt" fo:margin-bottom="4pt"/>
      <style:text-properties fo:color="#0f4761" fo:font-family="Arial" style:font-family-asian="Arial" style:font-family-complex="Arial" fo:font-size="20pt" style:font-size-complex="20pt"/>
    </style:style>
    <style:style style:parent-style-name="908" style:display-name="Heading 2" style:family="paragraph" style:name="850">
      <style:paragraph-properties fo:margin-top="8pt" fo:margin-bottom="4pt"/>
      <style:text-properties fo:color="#0f4761" fo:font-family="Arial" style:font-family-asian="Arial" style:font-family-complex="Arial" fo:font-size="16pt" style:font-size-complex="16pt"/>
    </style:style>
    <style:style style:parent-style-name="908" style:display-name="Heading 3" style:family="paragraph" style:name="851">
      <style:paragraph-properties fo:margin-top="8pt" fo:margin-bottom="4pt"/>
      <style:text-properties fo:color="#0f4761" fo:font-family="Arial" style:font-family-asian="Arial" style:font-family-complex="Arial" fo:font-size="14pt" style:font-size-complex="14pt"/>
    </style:style>
    <style:style style:parent-style-name="908" style:display-name="Heading 4" style:family="paragraph" style:name="852">
      <style:paragraph-properties fo:margin-top="4pt" fo:margin-bottom="2pt"/>
      <style:text-properties fo:color="#0f4761" fo:font-family="Arial" style:font-family-asian="Arial" style:font-family-complex="Arial" fo:font-style="italic"/>
    </style:style>
    <style:style style:parent-style-name="908" style:display-name="Heading 5" style:family="paragraph" style:name="853">
      <style:paragraph-properties fo:margin-top="4pt" fo:margin-bottom="2pt"/>
      <style:text-properties fo:color="#0f4761" fo:font-family="Arial" style:font-family-asian="Arial" style:font-family-complex="Arial"/>
    </style:style>
    <style:style style:parent-style-name="908" style:display-name="Heading 6" style:family="paragraph" style:name="854">
      <style:paragraph-properties fo:margin-top="2pt" fo:margin-bottom="0pt"/>
      <style:text-properties fo:color="#595959" fo:font-family="Arial" style:font-family-asian="Arial" style:font-family-complex="Arial" fo:font-style="italic"/>
    </style:style>
    <style:style style:parent-style-name="908" style:display-name="Heading 7" style:family="paragraph" style:name="855">
      <style:paragraph-properties fo:margin-top="2pt" fo:margin-bottom="0pt"/>
      <style:text-properties fo:color="#595959" fo:font-family="Arial" style:font-family-asian="Arial" style:font-family-complex="Arial"/>
    </style:style>
    <style:style style:parent-style-name="908" style:display-name="Heading 8" style:family="paragraph" style:name="856">
      <style:paragraph-properties fo:margin-bottom="0pt"/>
      <style:text-properties fo:color="#272727" fo:font-family="Arial" style:font-family-asian="Arial" style:font-family-complex="Arial" fo:font-style="italic"/>
    </style:style>
    <style:style style:parent-style-name="908" style:display-name="Heading 9" style:family="paragraph" style:name="857">
      <style:paragraph-properties fo:margin-bottom="0pt"/>
      <style:text-properties fo:color="#272727" fo:font-family="Arial" style:font-family-asian="Arial" style:font-family-complex="Arial" fo:font-style="italic"/>
    </style:style>
    <style:style style:class="default" style:display-name="Default Paragraph Font" style:family="text" style:name="858">
      <style:paragraph-properties fo:line-height="100%" fo:margin-top="0pt"/>
    </style:style>
    <style:style style:parent-style-name="858" style:display-name="Heading 1 Char" style:family="text" style:name="859">
      <style:paragraph-properties/>
      <style:text-properties fo:color="#0f4761" fo:font-family="Arial" style:font-family-asian="Arial" style:font-family-complex="Arial" fo:font-size="20pt" style:font-size-complex="20pt"/>
    </style:style>
    <style:style style:parent-style-name="858" style:display-name="Heading 2 Char" style:family="text" style:name="860">
      <style:paragraph-properties/>
      <style:text-properties fo:color="#0f4761" fo:font-family="Arial" style:font-family-asian="Arial" style:font-family-complex="Arial" fo:font-size="16pt" style:font-size-complex="16pt"/>
    </style:style>
    <style:style style:parent-style-name="858" style:display-name="Heading 3 Char" style:family="text" style:name="861">
      <style:paragraph-properties/>
      <style:text-properties fo:color="#0f4761" fo:font-family="Arial" style:font-family-asian="Arial" style:font-family-complex="Arial" fo:font-size="14pt" style:font-size-complex="14pt"/>
    </style:style>
    <style:style style:parent-style-name="858" style:display-name="Heading 4 Char" style:family="text" style:name="862">
      <style:paragraph-properties/>
      <style:text-properties fo:color="#0f4761" fo:font-family="Arial" style:font-family-asian="Arial" style:font-family-complex="Arial" fo:font-style="italic"/>
    </style:style>
    <style:style style:parent-style-name="858" style:display-name="Heading 5 Char" style:family="text" style:name="863">
      <style:paragraph-properties/>
      <style:text-properties fo:color="#0f4761" fo:font-family="Arial" style:font-family-asian="Arial" style:font-family-complex="Arial"/>
    </style:style>
    <style:style style:parent-style-name="858" style:display-name="Heading 6 Char" style:family="text" style:name="864">
      <style:paragraph-properties/>
      <style:text-properties fo:color="#595959" fo:font-family="Arial" style:font-family-asian="Arial" style:font-family-complex="Arial" fo:font-style="italic"/>
    </style:style>
    <style:style style:parent-style-name="858" style:display-name="Heading 7 Char" style:family="text" style:name="865">
      <style:paragraph-properties/>
      <style:text-properties fo:color="#595959" fo:font-family="Arial" style:font-family-asian="Arial" style:font-family-complex="Arial"/>
    </style:style>
    <style:style style:parent-style-name="858" style:display-name="Heading 8 Char" style:family="text" style:name="866">
      <style:paragraph-properties/>
      <style:text-properties fo:color="#272727" fo:font-family="Arial" style:font-family-asian="Arial" style:font-family-complex="Arial" fo:font-style="italic"/>
    </style:style>
    <style:style style:parent-style-name="858" style:display-name="Heading 9 Char" style:family="text" style:name="867">
      <style:paragraph-properties/>
      <style:text-properties fo:color="#272727" fo:font-family="Arial" style:font-family-asian="Arial" style:font-family-complex="Arial" fo:font-style="italic"/>
    </style:style>
    <style:style style:parent-style-name="908" style:display-name="Title" style:family="paragraph" style:name="868">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858" style:display-name="Title Char" style:family="text" style:name="869">
      <style:paragraph-properties/>
      <style:text-properties fo:font-family="Arial" style:font-family-asian="Arial" style:font-family-complex="Arial" fo:font-size="28pt" style:font-size-complex="28pt" fo:letter-spacing="-0.5pt"/>
    </style:style>
    <style:style style:parent-style-name="908" style:display-name="Subtitle" style:family="paragraph" style:name="870">
      <style:paragraph-properties/>
      <style:text-properties fo:color="#595959" fo:font-size="14pt" style:font-size-complex="14pt" fo:letter-spacing="0.75pt"/>
    </style:style>
    <style:style style:parent-style-name="858" style:display-name="Subtitle Char" style:family="text" style:name="871">
      <style:paragraph-properties/>
      <style:text-properties fo:color="#595959" fo:font-size="14pt" style:font-size-complex="14pt" fo:letter-spacing="0.75pt"/>
    </style:style>
    <style:style style:parent-style-name="908" style:display-name="Quote" style:family="paragraph" style:name="872">
      <style:paragraph-properties fo:text-align="center" fo:margin-top="8pt"/>
      <style:text-properties fo:color="#404040" fo:font-style="italic"/>
    </style:style>
    <style:style style:parent-style-name="858" style:display-name="Quote Char" style:family="text" style:name="873">
      <style:paragraph-properties/>
      <style:text-properties fo:color="#404040" fo:font-style="italic"/>
    </style:style>
    <style:style style:parent-style-name="858" style:display-name="Intense Emphasis" style:family="text" style:name="874">
      <style:paragraph-properties/>
      <style:text-properties fo:color="#0f4761" fo:font-style="italic"/>
    </style:style>
    <style:style style:parent-style-name="908" style:display-name="Intense Quote" style:family="paragraph" style:name="875">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858" style:display-name="Intense Quote Char" style:family="text" style:name="876">
      <style:paragraph-properties/>
      <style:text-properties fo:color="#0f4761" fo:font-style="italic"/>
    </style:style>
    <style:style style:parent-style-name="858" style:display-name="Intense Reference" style:family="text" style:name="877">
      <style:paragraph-properties/>
      <style:text-properties fo:font-variant="small-caps" fo:color="#0f4761" fo:letter-spacing="0.25pt" fo:font-weight="bold"/>
    </style:style>
    <style:style style:parent-style-name="858" style:display-name="Subtle Emphasis" style:family="text" style:name="878">
      <style:paragraph-properties/>
      <style:text-properties fo:color="#404040" fo:font-style="italic"/>
    </style:style>
    <style:style style:parent-style-name="858" style:display-name="Emphasis" style:family="text" style:name="879">
      <style:paragraph-properties/>
      <style:text-properties fo:font-style="italic"/>
    </style:style>
    <style:style style:parent-style-name="858" style:display-name="Strong" style:family="text" style:name="880">
      <style:paragraph-properties/>
      <style:text-properties fo:font-weight="bold"/>
    </style:style>
    <style:style style:parent-style-name="858" style:display-name="Subtle Reference" style:family="text" style:name="881">
      <style:paragraph-properties/>
      <style:text-properties fo:font-variant="small-caps" fo:color="#5a5a5a"/>
    </style:style>
    <style:style style:parent-style-name="858" style:display-name="Book Title" style:family="text" style:name="882">
      <style:paragraph-properties/>
      <style:text-properties fo:letter-spacing="0.25pt" fo:font-style="italic" fo:font-weight="bold"/>
    </style:style>
    <style:style style:parent-style-name="908" style:display-name="Header" style:family="paragraph" style:name="883">
      <style:paragraph-properties fo:line-height="100%" fo:margin-bottom="0pt">
        <style:tab-stops>
          <style:tab-stop style:position="8.545cm" style:type="center"/>
          <style:tab-stop style:position="17.09cm" style:type="right"/>
        </style:tab-stops>
      </style:paragraph-properties>
    </style:style>
    <style:style style:parent-style-name="858" style:display-name="Header Char" style:family="text" style:name="884">
      <style:paragraph-properties/>
    </style:style>
    <style:style style:parent-style-name="908" style:display-name="Footer" style:family="paragraph" style:name="885">
      <style:paragraph-properties fo:line-height="100%" fo:margin-bottom="0pt">
        <style:tab-stops>
          <style:tab-stop style:position="8.545cm" style:type="center"/>
          <style:tab-stop style:position="17.09cm" style:type="right"/>
        </style:tab-stops>
      </style:paragraph-properties>
    </style:style>
    <style:style style:parent-style-name="858" style:display-name="Footer Char" style:family="text" style:name="886">
      <style:paragraph-properties/>
    </style:style>
    <style:style style:parent-style-name="908" style:display-name="Caption" style:family="paragraph" style:name="887">
      <style:paragraph-properties fo:line-height="100%" fo:margin-bottom="10pt"/>
      <style:text-properties fo:color="#0e2841" fo:font-size="9pt" style:font-size-complex="9pt" fo:font-style="italic"/>
    </style:style>
    <style:style style:parent-style-name="908" style:display-name="footnote text" style:family="paragraph" style:name="888">
      <style:paragraph-properties fo:line-height="100%" fo:margin-bottom="0pt"/>
      <style:text-properties fo:font-size="10pt" style:font-size-complex="10pt"/>
    </style:style>
    <style:style style:parent-style-name="858" style:display-name="Footnote Text Char" style:family="text" style:name="889">
      <style:paragraph-properties/>
      <style:text-properties fo:font-size="10pt" style:font-size-complex="10pt"/>
    </style:style>
    <style:style style:parent-style-name="858" style:display-name="footnote reference" style:family="text" style:name="890">
      <style:paragraph-properties/>
      <style:text-properties style:text-position="super 58%"/>
    </style:style>
    <style:style style:parent-style-name="908" style:display-name="endnote text" style:family="paragraph" style:name="891">
      <style:paragraph-properties fo:line-height="100%" fo:margin-bottom="0pt"/>
      <style:text-properties fo:font-size="10pt" style:font-size-complex="10pt"/>
    </style:style>
    <style:style style:parent-style-name="858" style:display-name="Endnote Text Char" style:family="text" style:name="892">
      <style:paragraph-properties/>
      <style:text-properties fo:font-size="10pt" style:font-size-complex="10pt"/>
    </style:style>
    <style:style style:parent-style-name="858" style:display-name="endnote reference" style:family="text" style:name="893">
      <style:paragraph-properties/>
      <style:text-properties style:text-position="super 58%"/>
    </style:style>
    <style:style style:parent-style-name="858" style:display-name="Hyperlink" style:family="text" style:name="894">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858" style:display-name="FollowedHyperlink" style:family="text" style:name="895">
      <style:paragraph-properties/>
      <style:text-properties fo:color="#954f72" style:text-underline-type="single" style:text-underline-style="solid" style:text-underline-width="auto" style:text-underline-color="font-color"/>
    </style:style>
    <style:style style:parent-style-name="908" style:display-name="toc 1" style:family="paragraph" style:name="896">
      <style:paragraph-properties fo:margin-bottom="5pt"/>
    </style:style>
    <style:style style:parent-style-name="908" style:display-name="toc 2" style:family="paragraph" style:name="897">
      <style:paragraph-properties fo:margin-left="0.3881cm" fo:margin-bottom="5pt"/>
    </style:style>
    <style:style style:parent-style-name="908" style:display-name="toc 3" style:family="paragraph" style:name="898">
      <style:paragraph-properties fo:margin-left="0.7762cm" fo:margin-bottom="5pt"/>
    </style:style>
    <style:style style:parent-style-name="908" style:display-name="toc 4" style:family="paragraph" style:name="899">
      <style:paragraph-properties fo:margin-left="1.164cm" fo:margin-bottom="5pt"/>
    </style:style>
    <style:style style:parent-style-name="908" style:display-name="toc 5" style:family="paragraph" style:name="900">
      <style:paragraph-properties fo:margin-left="1.552cm" fo:margin-bottom="5pt"/>
    </style:style>
    <style:style style:parent-style-name="908" style:display-name="toc 6" style:family="paragraph" style:name="901">
      <style:paragraph-properties fo:margin-left="1.94cm" fo:margin-bottom="5pt"/>
    </style:style>
    <style:style style:parent-style-name="908" style:display-name="toc 7" style:family="paragraph" style:name="902">
      <style:paragraph-properties fo:margin-left="2.328cm" fo:margin-bottom="5pt"/>
    </style:style>
    <style:style style:parent-style-name="908" style:display-name="toc 8" style:family="paragraph" style:name="903">
      <style:paragraph-properties fo:margin-left="2.717cm" fo:margin-bottom="5pt"/>
    </style:style>
    <style:style style:parent-style-name="908" style:display-name="toc 9" style:family="paragraph" style:name="904">
      <style:paragraph-properties fo:margin-left="3.105cm" fo:margin-bottom="5pt"/>
    </style:style>
    <style:style style:parent-style-name="858" style:display-name="Placeholder Text" style:family="text" style:name="905">
      <style:paragraph-properties/>
      <style:text-properties fo:color="#666666"/>
    </style:style>
    <style:style style:display-name="TOC Heading" style:family="paragraph" style:name="906">
      <style:paragraph-properties/>
    </style:style>
    <style:style style:parent-style-name="908" style:display-name="table of figures" style:family="paragraph" style:name="907">
      <style:paragraph-properties fo:margin-bottom="0pt"/>
    </style:style>
    <style:style style:class="default" style:display-name="Normal" style:family="paragraph" style:name="908">
      <style:paragraph-properties fo:line-height="100%" fo:margin-top="0pt"/>
      <style:text-properties/>
    </style:style>
    <style:style style:parent-style-name="908" style:display-name="No Spacing" style:family="paragraph" style:name="911">
      <style:paragraph-properties fo:line-height="100%" fo:margin-bottom="0pt"/>
    </style:style>
    <style:style style:parent-style-name="908" style:display-name="List Paragraph" style:family="paragraph" style:name="912">
      <style:paragraph-properties fo:margin-left="1.27cm" style:contextual-spacing="true"/>
      <style:text-properties/>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font-family-asian="Symbol" style:font-family-complex="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Symbol" style:font-family-asian="Symbol" style:font-family-complex="Symbo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Symbol" style:font-family-asian="Symbol" style:font-family-complex="Symbo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style:style style:family="text" style:name="T145">
      <style:text-properties fo:font-family="Symbol" style:font-family-asian="Symbol" style:font-family-complex="Symbol"/>
    </style:style>
    <style:style style:family="text" style:name="T146">
      <style:text-properties fo:font-family="Courier New" style:font-family-asian="Courier New" style:font-family-complex="Courier New"/>
    </style:style>
    <style:style style:family="text" style:name="T147">
      <style:text-properties fo:font-family="Wingdings" style:font-family-asian="Wingdings" style:font-family-complex="Wingdings"/>
    </style:style>
    <style:style style:family="text" style:name="T148">
      <style:text-properties fo:font-family="Symbol" style:font-family-asian="Symbol" style:font-family-complex="Symbol"/>
    </style:style>
    <style:style style:family="text" style:name="T149">
      <style:text-properties fo:font-family="Courier New" style:font-family-asian="Courier New" style:font-family-complex="Courier New"/>
    </style:style>
    <style:style style:family="text" style:name="T150">
      <style:text-properties fo:font-family="Wingdings" style:font-family-asian="Wingdings" style:font-family-complex="Wingdings"/>
    </style:style>
    <style:style style:family="text" style:name="T151">
      <style:text-properties fo:font-family="Symbol" style:font-family-asian="Symbol" style:font-family-complex="Symbol"/>
    </style:style>
    <style:style style:family="text" style:name="T152">
      <style:text-properties fo:font-family="Courier New" style:font-family-asian="Courier New" style:font-family-complex="Courier New"/>
    </style:style>
    <style:style style:family="text" style:name="T153">
      <style:text-properties fo:font-family="Wingdings" style:font-family-asian="Wingdings" style:font-family-complex="Wingdings"/>
    </style:style>
    <style:style style:family="text" style:name="T154">
      <style:text-properties fo:font-family="Symbol" style:font-family-asian="Symbol" style:font-family-complex="Symbol"/>
    </style:style>
    <style:style style:family="text" style:name="T155">
      <style:text-properties fo:font-family="Courier New" style:font-family-asian="Courier New" style:font-family-complex="Courier New"/>
    </style:style>
    <style:style style:family="text" style:name="T156">
      <style:text-properties fo:font-family="Wingdings" style:font-family-asian="Wingdings" style:font-family-complex="Wingdings"/>
    </style:style>
    <style:style style:family="text" style:name="T157">
      <style:text-properties fo:font-family="Symbol" style:font-family-asian="Symbol" style:font-family-complex="Symbol"/>
    </style:style>
    <style:style style:family="text" style:name="T158">
      <style:text-properties fo:font-family="Courier New" style:font-family-asian="Courier New" style:font-family-complex="Courier New"/>
    </style:style>
    <style:style style:family="text" style:name="T159">
      <style:text-properties fo:font-family="Wingdings" style:font-family-asian="Wingdings" style:font-family-complex="Wingdings"/>
    </style:style>
    <style:style style:family="text" style:name="T160">
      <style:text-properties fo:font-family="Symbol" style:font-family-asian="Symbol" style:font-family-complex="Symbol"/>
    </style:style>
    <style:style style:family="text" style:name="T161">
      <style:text-properties fo:font-family="Courier New" style:font-family-asian="Courier New" style:font-family-complex="Courier New"/>
    </style:style>
    <style:style style:family="text" style:name="T162">
      <style:text-properties fo:font-family="Wingdings" style:font-family-asian="Wingdings" style:font-family-complex="Wingdings"/>
    </style:style>
    <style:style style:family="text" style:name="T163">
      <style:text-properties fo:font-family="Symbol" style:font-family-asian="Symbol" style:font-family-complex="Symbol"/>
    </style:style>
    <style:style style:family="text" style:name="T164">
      <style:text-properties fo:font-family="Courier New" style:font-family-asian="Courier New" style:font-family-complex="Courier New"/>
    </style:style>
    <style:style style:family="text" style:name="T165">
      <style:text-properties fo:font-family="Wingdings" style:font-family-asian="Wingdings" style:font-family-complex="Wingdings"/>
    </style:style>
    <style:style style:family="text" style:name="T166">
      <style:text-properties fo:font-family="Symbol" style:font-family-asian="Symbol" style:font-family-complex="Symbol"/>
    </style:style>
    <style:style style:family="text" style:name="T167">
      <style:text-properties fo:font-family="Courier New" style:font-family-asian="Courier New" style:font-family-complex="Courier New"/>
    </style:style>
    <style:style style:family="text" style:name="T168">
      <style:text-properties fo:font-family="Wingdings" style:font-family-asian="Wingdings" style:font-family-complex="Wingdings"/>
    </style:style>
    <style:style style:family="text" style:name="T169">
      <style:text-properties fo:font-family="Symbol" style:font-family-asian="Symbol" style:font-family-complex="Symbol"/>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Symbol" style:font-family-asian="Symbol" style:font-family-complex="Symbo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Symbol" style:font-family-asian="Symbol" style:font-family-complex="Symbol"/>
    </style:style>
    <style:style style:family="text" style:name="T179">
      <style:text-properties fo:font-family="Courier New" style:font-family-asian="Courier New" style:font-family-complex="Courier New"/>
    </style:style>
    <style:style style:family="text" style:name="T180">
      <style:text-properties fo:font-family="Wingdings" style:font-family-asian="Wingdings" style:font-family-complex="Wingdings"/>
    </style:style>
    <style:style style:family="text" style:name="T181">
      <style:text-properties fo:font-family="Symbol" style:font-family-asian="Symbol" style:font-family-complex="Symbol"/>
    </style:style>
    <style:style style:family="text" style:name="T182">
      <style:text-properties fo:font-family="Courier New" style:font-family-asian="Courier New" style:font-family-complex="Courier New"/>
    </style:style>
    <style:style style:family="text" style:name="T183">
      <style:text-properties fo:font-family="Wingdings" style:font-family-asian="Wingdings" style:font-family-complex="Wingdings"/>
    </style:style>
    <style:style style:family="text" style:name="T184">
      <style:text-properties fo:font-family="Symbol" style:font-family-asian="Symbol" style:font-family-complex="Symbol"/>
    </style:style>
    <style:style style:family="text" style:name="T185">
      <style:text-properties fo:font-family="Courier New" style:font-family-asian="Courier New" style:font-family-complex="Courier New"/>
    </style:style>
    <style:style style:family="text" style:name="T186">
      <style:text-properties fo:font-family="Wingdings" style:font-family-asian="Wingdings" style:font-family-complex="Wingdings"/>
    </style:style>
    <style:style style:family="text" style:name="T187">
      <style:text-properties fo:font-family="Symbol" style:font-family-asian="Symbol" style:font-family-complex="Symbol"/>
    </style:style>
    <style:style style:family="text" style:name="T188">
      <style:text-properties fo:font-family="Courier New" style:font-family-asian="Courier New" style:font-family-complex="Courier New"/>
    </style:style>
    <style:style style:family="text" style:name="T189">
      <style:text-properties fo:font-family="Wingdings" style:font-family-asian="Wingdings" style:font-family-complex="Wingdings"/>
    </style:style>
    <style:style style:family="text" style:name="T190">
      <style:text-properties fo:font-family="Symbol" style:font-family-asian="Symbol" style:font-family-complex="Symbol"/>
    </style:style>
    <style:style style:family="text" style:name="T191">
      <style:text-properties fo:font-family="Courier New" style:font-family-asian="Courier New" style:font-family-complex="Courier New"/>
    </style:style>
    <style:style style:family="text" style:name="T192">
      <style:text-properties fo:font-family="Wingdings" style:font-family-asian="Wingdings" style:font-family-complex="Wingdings"/>
    </style:style>
    <style:style style:family="text" style:name="T193">
      <style:text-properties fo:font-family="Symbol" style:font-family-asian="Symbol" style:font-family-complex="Symbol"/>
    </style:style>
    <style:style style:family="text" style:name="T194">
      <style:text-properties fo:font-family="Courier New" style:font-family-asian="Courier New" style:font-family-complex="Courier New"/>
    </style:style>
    <style:style style:family="text" style:name="T195">
      <style:text-properties fo:font-family="Wingdings" style:font-family-asian="Wingdings" style:font-family-complex="Wingdings"/>
    </style:style>
    <style:style style:family="text" style:name="T196">
      <style:text-properties fo:font-family="Symbol" style:font-family-asian="Symbol" style:font-family-complex="Symbol"/>
    </style:style>
    <style:style style:family="text" style:name="T197">
      <style:text-properties fo:font-family="Courier New" style:font-family-asian="Courier New" style:font-family-complex="Courier New"/>
    </style:style>
    <style:style style:family="text" style:name="T198">
      <style:text-properties fo:font-family="Wingdings" style:font-family-asian="Wingdings" style:font-family-complex="Wingdings"/>
    </style:style>
    <style:style style:family="text" style:name="T199">
      <style:text-properties fo:font-family="Symbol" style:font-family-asian="Symbol" style:font-family-complex="Symbol"/>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fo:font-family="Symbol" style:font-family-asian="Symbol" style:font-family-complex="Symbol"/>
    </style:style>
    <style:style style:family="text" style:name="T209">
      <style:text-properties fo:font-family="Courier New" style:font-family-asian="Courier New" style:font-family-complex="Courier New"/>
    </style:style>
    <style:style style:family="text" style:name="T210">
      <style:text-properties fo:font-family="Wingdings" style:font-family-asian="Wingdings" style:font-family-complex="Wingdings"/>
    </style:style>
    <style:style style:family="text" style:name="T211">
      <style:text-properties fo:font-family="Symbol" style:font-family-asian="Symbol" style:font-family-complex="Symbol"/>
    </style:style>
    <style:style style:family="text" style:name="T212">
      <style:text-properties fo:font-family="Courier New" style:font-family-asian="Courier New" style:font-family-complex="Courier New"/>
    </style:style>
    <style:style style:family="text" style:name="T213">
      <style:text-properties fo:font-family="Wingdings" style:font-family-asian="Wingdings" style:font-family-complex="Wingdings"/>
    </style:style>
    <style:style style:family="text" style:name="T214">
      <style:text-properties fo:font-family="Symbol" style:font-family-asian="Symbol" style:font-family-complex="Symbol"/>
    </style:style>
    <style:style style:family="text" style:name="T215">
      <style:text-properties fo:font-family="Courier New" style:font-family-asian="Courier New" style:font-family-complex="Courier New"/>
    </style:style>
    <style:style style:family="text" style:name="T216">
      <style:text-properties fo:font-family="Wingdings" style:font-family-asian="Wingdings" style:font-family-complex="Wingdings"/>
    </style:style>
    <style:style style:family="text" style:name="T217">
      <style:text-properties fo:font-family="Symbol" style:font-family-asian="Symbol" style:font-family-complex="Symbol"/>
    </style:style>
    <style:style style:family="text" style:name="T218">
      <style:text-properties fo:font-family="Courier New" style:font-family-asian="Courier New" style:font-family-complex="Courier New"/>
    </style:style>
    <style:style style:family="text" style:name="T219">
      <style:text-properties fo:font-family="Wingdings" style:font-family-asian="Wingdings" style:font-family-complex="Wingdings"/>
    </style:style>
    <style:style style:family="text" style:name="T220">
      <style:text-properties fo:font-family="Symbol" style:font-family-asian="Symbol" style:font-family-complex="Symbol"/>
    </style:style>
    <style:style style:family="text" style:name="T221">
      <style:text-properties fo:font-family="Courier New" style:font-family-asian="Courier New" style:font-family-complex="Courier New"/>
    </style:style>
    <style:style style:family="text" style:name="T222">
      <style:text-properties fo:font-family="Wingdings" style:font-family-asian="Wingdings" style:font-family-complex="Wingdings"/>
    </style:style>
    <style:style style:family="text" style:name="T223">
      <style:text-properties fo:font-family="Symbol" style:font-family-asian="Symbol" style:font-family-complex="Symbol"/>
    </style:style>
    <style:style style:family="text" style:name="T224">
      <style:text-properties fo:font-family="Courier New" style:font-family-asian="Courier New" style:font-family-complex="Courier New"/>
    </style:style>
    <style:style style:family="text" style:name="T225">
      <style:text-properties fo:font-family="Wingdings" style:font-family-asian="Wingdings" style:font-family-complex="Wingdings"/>
    </style:style>
    <style:style style:family="text" style:name="T226">
      <style:text-properties fo:font-family="Symbol" style:font-family-asian="Symbol" style:font-family-complex="Symbol"/>
    </style:style>
    <style:style style:family="text" style:name="T227">
      <style:text-properties fo:font-family="Courier New" style:font-family-asian="Courier New" style:font-family-complex="Courier New"/>
    </style:style>
    <style:style style:family="text" style:name="T228">
      <style:text-properties fo:font-family="Wingdings" style:font-family-asian="Wingdings" style:font-family-complex="Wingdings"/>
    </style:style>
    <style:style style:family="text" style:name="T229">
      <style:text-properties fo:font-family="Symbol" style:font-family-asian="Symbol" style:font-family-complex="Symbol"/>
    </style:style>
    <style:style style:family="text" style:name="T230">
      <style:text-properties fo:font-family="Courier New" style:font-family-asian="Courier New" style:font-family-complex="Courier New"/>
    </style:style>
    <style:style style:family="text" style:name="T231">
      <style:text-properties fo:font-family="Wingdings" style:font-family-asian="Wingdings" style:font-family-complex="Wingdings"/>
    </style:style>
    <style:style style:family="text" style:name="T232">
      <style:text-properties fo:font-family="Symbol" style:font-family-asian="Symbol" style:font-family-complex="Symbol"/>
    </style:style>
    <style:style style:family="text" style:name="T233">
      <style:text-properties fo:font-family="Courier New" style:font-family-asian="Courier New" style:font-family-complex="Courier New"/>
    </style:style>
    <style:style style:family="text" style:name="T234">
      <style:text-properties fo:font-family="Wingdings" style:font-family-asian="Wingdings" style:font-family-complex="Wingdings"/>
    </style:style>
    <style:style style:family="text" style:name="T235">
      <style:text-properties fo:font-family="Symbol" style:font-family-asian="Symbol" style:font-family-complex="Symbol"/>
    </style:style>
    <style:style style:family="text" style:name="T236">
      <style:text-properties fo:font-family="Courier New" style:font-family-asian="Courier New" style:font-family-complex="Courier New"/>
    </style:style>
    <style:style style:family="text" style:name="T237">
      <style:text-properties fo:font-family="Wingdings" style:font-family-asian="Wingdings" style:font-family-complex="Wingdings"/>
    </style:style>
    <style:style style:family="text" style:name="T238">
      <style:text-properties fo:font-family="Symbol" style:font-family-asian="Symbol" style:font-family-complex="Symbol"/>
    </style:style>
    <style:style style:family="text" style:name="T239">
      <style:text-properties fo:font-family="Courier New" style:font-family-asian="Courier New" style:font-family-complex="Courier New"/>
    </style:style>
    <style:style style:family="text" style:name="T240">
      <style:text-properties fo:font-family="Wingdings" style:font-family-asian="Wingdings" style:font-family-complex="Wingdings"/>
    </style:style>
    <style:style style:family="text" style:name="T241">
      <style:text-properties fo:font-family="Symbol" style:font-family-asian="Symbol" style:font-family-complex="Symbol"/>
    </style:style>
    <style:style style:family="text" style:name="T242">
      <style:text-properties fo:font-family="Courier New" style:font-family-asian="Courier New" style:font-family-complex="Courier New"/>
    </style:style>
    <style:style style:family="text" style:name="T243">
      <style:text-properties fo:font-family="Wingdings" style:font-family-asian="Wingdings" style:font-family-complex="Wingdings"/>
    </style:style>
    <style:style style:family="text" style:name="T244">
      <style:text-properties fo:font-family="Symbol" style:font-family-asian="Symbol" style:font-family-complex="Symbol"/>
    </style:style>
    <style:style style:family="text" style:name="T245">
      <style:text-properties fo:font-family="Courier New" style:font-family-asian="Courier New" style:font-family-complex="Courier New"/>
    </style:style>
    <style:style style:family="text" style:name="T246">
      <style:text-properties fo:font-family="Wingdings" style:font-family-asian="Wingdings" style:font-family-complex="Wingdings"/>
    </style:style>
    <style:style style:family="text" style:name="T247">
      <style:text-properties fo:font-family="Symbol" style:font-family-asian="Symbol" style:font-family-complex="Symbol"/>
    </style:style>
    <style:style style:family="text" style:name="T248">
      <style:text-properties fo:font-family="Courier New" style:font-family-asian="Courier New" style:font-family-complex="Courier New"/>
    </style:style>
    <style:style style:family="text" style:name="T249">
      <style:text-properties fo:font-family="Wingdings" style:font-family-asian="Wingdings" style:font-family-complex="Wingdings"/>
    </style:style>
    <style:style style:family="text" style:name="T250">
      <style:text-properties fo:font-family="Symbol" style:font-family-asian="Symbol" style:font-family-complex="Symbol"/>
    </style:style>
    <style:style style:family="text" style:name="T251">
      <style:text-properties fo:font-family="Courier New" style:font-family-asian="Courier New" style:font-family-complex="Courier New"/>
    </style:style>
    <style:style style:family="text" style:name="T252">
      <style:text-properties fo:font-family="Wingdings" style:font-family-asian="Wingdings" style:font-family-complex="Wingdings"/>
    </style:style>
    <style:style style:family="text" style:name="T253">
      <style:text-properties fo:font-family="Symbol" style:font-family-asian="Symbol" style:font-family-complex="Symbol"/>
    </style:style>
    <style:style style:family="text" style:name="T254">
      <style:text-properties fo:font-family="Courier New" style:font-family-asian="Courier New" style:font-family-complex="Courier New"/>
    </style:style>
    <style:style style:family="text" style:name="T255">
      <style:text-properties fo:font-family="Wingdings" style:font-family-asian="Wingdings" style:font-family-complex="Wingdings"/>
    </style:style>
    <style:style style:family="text" style:name="T256">
      <style:text-properties fo:font-family="Symbol" style:font-family-asian="Symbol" style:font-family-complex="Symbol"/>
    </style:style>
    <style:style style:family="text" style:name="T257">
      <style:text-properties fo:font-family="Courier New" style:font-family-asian="Courier New" style:font-family-complex="Courier New"/>
    </style:style>
    <style:style style:family="text" style:name="T258">
      <style:text-properties fo:font-family="Wingdings" style:font-family-asian="Wingdings" style:font-family-complex="Wingdings"/>
    </style:style>
    <style:style style:family="text" style:name="T259">
      <style:text-properties fo:font-family="Symbol" style:font-family-asian="Symbol" style:font-family-complex="Symbol"/>
    </style:style>
    <style:style style:family="text" style:name="T260">
      <style:text-properties fo:font-family="Courier New" style:font-family-asian="Courier New" style:font-family-complex="Courier New"/>
    </style:style>
    <style:style style:family="text" style:name="T261">
      <style:text-properties fo:font-family="Wingdings" style:font-family-asian="Wingdings" style:font-family-complex="Wingdings"/>
    </style:style>
    <style:style style:family="text" style:name="T262">
      <style:text-properties fo:font-family="Symbol" style:font-family-asian="Symbol" style:font-family-complex="Symbol"/>
    </style:style>
    <style:style style:family="text" style:name="T263">
      <style:text-properties fo:font-family="Courier New" style:font-family-asian="Courier New" style:font-family-complex="Courier New"/>
    </style:style>
    <style:style style:family="text" style:name="T264">
      <style:text-properties fo:font-family="Wingdings" style:font-family-asian="Wingdings" style:font-family-complex="Wingdings"/>
    </style:style>
    <style:style style:family="text" style:name="T265">
      <style:text-properties fo:font-family="Symbol" style:font-family-asian="Symbol" style:font-family-complex="Symbol"/>
    </style:style>
    <style:style style:family="text" style:name="T266">
      <style:text-properties fo:font-family="Courier New" style:font-family-asian="Courier New" style:font-family-complex="Courier New"/>
    </style:style>
    <style:style style:family="text" style:name="T267">
      <style:text-properties fo:font-family="Wingdings" style:font-family-asian="Wingdings" style:font-family-complex="Wingdings"/>
    </style:style>
    <style:style style:family="text" style:name="T268">
      <style:text-properties fo:font-family="Symbol" style:font-family-asian="Symbol" style:font-family-complex="Symbol"/>
    </style:style>
    <style:style style:family="text" style:name="T269">
      <style:text-properties fo:font-family="Courier New" style:font-family-asian="Courier New" style:font-family-complex="Courier New"/>
    </style:style>
    <style:style style:family="text" style:name="T270">
      <style:text-properties fo:font-family="Wingdings" style:font-family-asian="Wingdings" style:font-family-complex="Wingdings"/>
    </style:style>
    <style:style style:family="text" style:name="T271">
      <style:text-properties fo:font-family="Symbol" style:font-family-asian="Symbol" style:font-family-complex="Symbol"/>
    </style:style>
    <style:style style:family="text" style:name="T272">
      <style:text-properties fo:font-family="Courier New" style:font-family-asian="Courier New" style:font-family-complex="Courier New"/>
    </style:style>
    <style:style style:family="text" style:name="T273">
      <style:text-properties fo:font-family="Wingdings" style:font-family-asian="Wingdings" style:font-family-complex="Wingdings"/>
    </style:style>
    <style:style style:family="text" style:name="T274">
      <style:text-properties fo:font-family="Symbol" style:font-family-asian="Symbol" style:font-family-complex="Symbol"/>
    </style:style>
    <style:style style:family="text" style:name="T275">
      <style:text-properties fo:font-family="Courier New" style:font-family-asian="Courier New" style:font-family-complex="Courier New"/>
    </style:style>
    <style:style style:family="text" style:name="T276">
      <style:text-properties fo:font-family="Wingdings" style:font-family-asian="Wingdings" style:font-family-complex="Wingdings"/>
    </style:style>
    <style:style style:family="text" style:name="T277">
      <style:text-properties fo:font-family="Symbol" style:font-family-asian="Symbol" style:font-family-complex="Symbol"/>
    </style:style>
    <style:style style:family="text" style:name="T278">
      <style:text-properties fo:font-family="Courier New" style:font-family-asian="Courier New" style:font-family-complex="Courier New"/>
    </style:style>
    <style:style style:family="text" style:name="T279">
      <style:text-properties fo:font-family="Wingdings" style:font-family-asian="Wingdings" style:font-family-complex="Wingdings"/>
    </style:style>
    <style:style style:family="text" style:name="T280">
      <style:text-properties fo:font-family="Symbol" style:font-family-asian="Symbol" style:font-family-complex="Symbol"/>
    </style:style>
    <style:style style:family="text" style:name="T281">
      <style:text-properties fo:font-family="Courier New" style:font-family-asian="Courier New" style:font-family-complex="Courier New"/>
    </style:style>
    <style:style style:family="text" style:name="T282">
      <style:text-properties fo:font-family="Wingdings" style:font-family-asian="Wingdings" style:font-family-complex="Wingdings"/>
    </style:style>
    <style:style style:family="text" style:name="T283">
      <style:text-properties fo:font-family="Symbol" style:font-family-asian="Symbol" style:font-family-complex="Symbol"/>
    </style:style>
    <style:style style:family="text" style:name="T284">
      <style:text-properties fo:font-family="Courier New" style:font-family-asian="Courier New" style:font-family-complex="Courier New"/>
    </style:style>
    <style:style style:family="text" style:name="T285">
      <style:text-properties fo:font-family="Wingdings" style:font-family-asian="Wingdings" style:font-family-complex="Wingdings"/>
    </style:style>
    <style:style style:family="text" style:name="T286">
      <style:text-properties fo:font-family="Symbol" style:font-family-asian="Symbol" style:font-family-complex="Symbol"/>
    </style:style>
    <style:style style:family="text" style:name="T287">
      <style:text-properties fo:font-family="Courier New" style:font-family-asian="Courier New" style:font-family-complex="Courier New"/>
    </style:style>
    <style:style style:family="text" style:name="T288">
      <style:text-properties fo:font-family="Wingdings" style:font-family-asian="Wingdings" style:font-family-complex="Wingdings"/>
    </style:style>
    <style:style style:family="text" style:name="T289">
      <style:text-properties fo:font-family="Symbol" style:font-family-asian="Symbol" style:font-family-complex="Symbol"/>
    </style:style>
    <style:style style:family="text" style:name="T290">
      <style:text-properties fo:font-family="Courier New" style:font-family-asian="Courier New" style:font-family-complex="Courier New"/>
    </style:style>
    <style:style style:family="text" style:name="T291">
      <style:text-properties fo:font-family="Wingdings" style:font-family-asian="Wingdings" style:font-family-complex="Wingdings"/>
    </style:style>
    <style:style style:family="text" style:name="T292">
      <style:text-properties fo:font-family="Symbol" style:font-family-asian="Symbol" style:font-family-complex="Symbol"/>
    </style:style>
    <style:style style:family="text" style:name="T293">
      <style:text-properties fo:font-family="Courier New" style:font-family-asian="Courier New" style:font-family-complex="Courier New"/>
    </style:style>
    <style:style style:family="text" style:name="T294">
      <style:text-properties fo:font-family="Wingdings" style:font-family-asian="Wingdings" style:font-family-complex="Wingdings"/>
    </style:style>
    <style:style style:family="text" style:name="T295">
      <style:text-properties fo:font-family="Symbol" style:font-family-asian="Symbol" style:font-family-complex="Symbol"/>
    </style:style>
    <style:style style:family="text" style:name="T296">
      <style:text-properties fo:font-family="Courier New" style:font-family-asian="Courier New" style:font-family-complex="Courier New"/>
    </style:style>
    <style:style style:family="text" style:name="T297">
      <style:text-properties fo:font-family="Wingdings" style:font-family-asian="Wingdings" style:font-family-complex="Wingdings"/>
    </style:style>
    <style:style style:family="text" style:name="T298">
      <style:text-properties fo:font-family="Symbol" style:font-family-asian="Symbol" style:font-family-complex="Symbol"/>
    </style:style>
    <style:style style:family="text" style:name="T299">
      <style:text-properties fo:font-family="Courier New" style:font-family-asian="Courier New" style:font-family-complex="Courier New"/>
    </style:style>
    <style:style style:family="text" style:name="T300">
      <style:text-properties fo:font-family="Wingdings" style:font-family-asian="Wingdings" style:font-family-complex="Wingdings"/>
    </style:style>
    <style:style style:family="text" style:name="T301">
      <style:text-properties fo:font-family="Symbol" style:font-family-asian="Symbol" style:font-family-complex="Symbol"/>
    </style:style>
    <style:style style:family="text" style:name="T302">
      <style:text-properties fo:font-family="Courier New" style:font-family-asian="Courier New" style:font-family-complex="Courier New"/>
    </style:style>
    <style:style style:family="text" style:name="T303">
      <style:text-properties fo:font-family="Wingdings" style:font-family-asian="Wingdings" style:font-family-complex="Wingdings"/>
    </style:style>
    <style:style style:family="text" style:name="T304">
      <style:text-properties fo:font-family="Symbol" style:font-family-asian="Symbol" style:font-family-complex="Symbol"/>
    </style:style>
    <style:style style:family="text" style:name="T305">
      <style:text-properties fo:font-family="Courier New" style:font-family-asian="Courier New" style:font-family-complex="Courier New"/>
    </style:style>
    <style:style style:family="text" style:name="T306">
      <style:text-properties fo:font-family="Wingdings" style:font-family-asian="Wingdings" style:font-family-complex="Wingdings"/>
    </style:style>
    <style:style style:family="text" style:name="T307">
      <style:text-properties fo:font-family="Symbol" style:font-family-asian="Symbol" style:font-family-complex="Symbol"/>
    </style:style>
    <style:style style:family="text" style:name="T308">
      <style:text-properties fo:font-family="Courier New" style:font-family-asian="Courier New" style:font-family-complex="Courier New"/>
    </style:style>
    <style:style style:family="text" style:name="T309">
      <style:text-properties fo:font-family="Wingdings" style:font-family-asian="Wingdings" style:font-family-complex="Wingdings"/>
    </style:style>
    <style:style style:family="text" style:name="T310">
      <style:text-properties fo:font-family="Symbol" style:font-family-asian="Symbol" style:font-family-complex="Symbol"/>
    </style:style>
    <style:style style:family="text" style:name="T311">
      <style:text-properties fo:font-family="Courier New" style:font-family-asian="Courier New" style:font-family-complex="Courier New"/>
    </style:style>
    <style:style style:family="text" style:name="T312">
      <style:text-properties fo:font-family="Wingdings" style:font-family-asian="Wingdings" style:font-family-complex="Wingdings"/>
    </style:style>
    <style:style style:family="text" style:name="T313">
      <style:text-properties fo:font-family="Symbol" style:font-family-asian="Symbol" style:font-family-complex="Symbol"/>
    </style:style>
    <style:style style:family="text" style:name="T314">
      <style:text-properties fo:font-family="Courier New" style:font-family-asian="Courier New" style:font-family-complex="Courier New"/>
    </style:style>
    <style:style style:family="text" style:name="T315">
      <style:text-properties fo:font-family="Wingdings" style:font-family-asian="Wingdings" style:font-family-complex="Wingdings"/>
    </style:style>
    <style:style style:family="text" style:name="T316">
      <style:text-properties fo:font-family="Symbol" style:font-family-asian="Symbol" style:font-family-complex="Symbol"/>
    </style:style>
    <style:style style:family="text" style:name="T317">
      <style:text-properties fo:font-family="Courier New" style:font-family-asian="Courier New" style:font-family-complex="Courier New"/>
    </style:style>
    <style:style style:family="text" style:name="T318">
      <style:text-properties fo:font-family="Wingdings" style:font-family-asian="Wingdings" style:font-family-complex="Wingdings"/>
    </style:style>
    <style:style style:family="text" style:name="T319">
      <style:text-properties fo:font-family="Symbol" style:font-family-asian="Symbol" style:font-family-complex="Symbol"/>
    </style:style>
    <style:style style:family="text" style:name="T320">
      <style:text-properties fo:font-family="Courier New" style:font-family-asian="Courier New" style:font-family-complex="Courier New"/>
    </style:style>
    <style:style style:family="text" style:name="T321">
      <style:text-properties fo:font-family="Wingdings" style:font-family-asian="Wingdings" style:font-family-complex="Wingdings"/>
    </style:style>
    <style:style style:family="text" style:name="T322">
      <style:text-properties fo:font-family="Symbol" style:font-family-asian="Symbol" style:font-family-complex="Symbol"/>
    </style:style>
    <style:style style:family="text" style:name="T323">
      <style:text-properties fo:font-family="Courier New" style:font-family-asian="Courier New" style:font-family-complex="Courier New"/>
    </style:style>
    <style:style style:family="text" style:name="T324">
      <style:text-properties fo:font-family="Wingdings" style:font-family-asian="Wingdings" style:font-family-complex="Wingdings"/>
    </style:style>
    <style:style style:family="text" style:name="T325">
      <style:text-properties fo:font-family="Symbol" style:font-family-asian="Symbol" style:font-family-complex="Symbol"/>
    </style:style>
    <style:style style:family="text" style:name="T326">
      <style:text-properties fo:font-family="Courier New" style:font-family-asian="Courier New" style:font-family-complex="Courier New"/>
    </style:style>
    <style:style style:family="text" style:name="T327">
      <style:text-properties fo:font-family="Wingdings" style:font-family-asian="Wingdings" style:font-family-complex="Wingdings"/>
    </style:style>
    <style:style style:family="text" style:name="T328">
      <style:text-properties fo:font-family="Symbol" style:font-family-asian="Symbol" style:font-family-complex="Symbol"/>
    </style:style>
    <style:style style:family="text" style:name="T329">
      <style:text-properties fo:font-family="Courier New" style:font-family-asian="Courier New" style:font-family-complex="Courier New"/>
    </style:style>
    <style:style style:family="text" style:name="T330">
      <style:text-properties fo:font-family="Wingdings" style:font-family-asian="Wingdings" style:font-family-complex="Wingdings"/>
    </style:style>
    <style:style style:family="text" style:name="T331">
      <style:text-properties fo:font-family="Symbol" style:font-family-asian="Symbol" style:font-family-complex="Symbol"/>
    </style:style>
    <style:style style:family="text" style:name="T332">
      <style:text-properties fo:font-family="Courier New" style:font-family-asian="Courier New" style:font-family-complex="Courier New"/>
    </style:style>
    <style:style style:family="text" style:name="T333">
      <style:text-properties fo:font-family="Wingdings" style:font-family-asian="Wingdings" style:font-family-complex="Wingdings"/>
    </style:style>
    <style:style style:family="text" style:name="T334">
      <style:text-properties fo:font-family="Symbol" style:font-family-asian="Symbol" style:font-family-complex="Symbol"/>
    </style:style>
    <style:style style:family="text" style:name="T335">
      <style:text-properties fo:font-family="Courier New" style:font-family-asian="Courier New" style:font-family-complex="Courier New"/>
    </style:style>
    <style:style style:family="text" style:name="T336">
      <style:text-properties fo:font-family="Wingdings" style:font-family-asian="Wingdings" style:font-family-complex="Wingdings"/>
    </style:style>
    <style:style style:family="text" style:name="T337">
      <style:text-properties fo:font-family="Symbol" style:font-family-asian="Symbol" style:font-family-complex="Symbol"/>
    </style:style>
    <style:style style:family="text" style:name="T338">
      <style:text-properties fo:font-family="Courier New" style:font-family-asian="Courier New" style:font-family-complex="Courier New"/>
    </style:style>
    <style:style style:family="text" style:name="T339">
      <style:text-properties fo:font-family="Wingdings" style:font-family-asian="Wingdings" style:font-family-complex="Wingdings"/>
    </style:style>
    <style:style style:family="text" style:name="T340">
      <style:text-properties fo:font-family="Symbol" style:font-family-asian="Symbol" style:font-family-complex="Symbol"/>
    </style:style>
    <style:style style:family="text" style:name="T341">
      <style:text-properties fo:font-family="Courier New" style:font-family-asian="Courier New" style:font-family-complex="Courier New"/>
    </style:style>
    <style:style style:family="text" style:name="T342">
      <style:text-properties fo:font-family="Wingdings" style:font-family-asian="Wingdings" style:font-family-complex="Wingdings"/>
    </style:style>
    <style:style style:family="text" style:name="T343">
      <style:text-properties fo:font-family="Symbol" style:font-family-asian="Symbol" style:font-family-complex="Symbol"/>
    </style:style>
    <style:style style:family="text" style:name="T344">
      <style:text-properties fo:font-family="Courier New" style:font-family-asian="Courier New" style:font-family-complex="Courier New"/>
    </style:style>
    <style:style style:family="text" style:name="T345">
      <style:text-properties fo:font-family="Wingdings" style:font-family-asian="Wingdings" style:font-family-complex="Wingdings"/>
    </style:style>
    <style:style style:family="text" style:name="T346">
      <style:text-properties fo:font-family="Symbol" style:font-family-asian="Symbol" style:font-family-complex="Symbol"/>
    </style:style>
    <style:style style:family="text" style:name="T347">
      <style:text-properties fo:font-family="Courier New" style:font-family-asian="Courier New" style:font-family-complex="Courier New"/>
    </style:style>
    <style:style style:family="text" style:name="T348">
      <style:text-properties fo:font-family="Wingdings" style:font-family-asian="Wingdings" style:font-family-complex="Wingdings"/>
    </style:style>
    <style:style style:family="text" style:name="T349">
      <style:text-properties fo:font-family="Symbol" style:font-family-asian="Symbol" style:font-family-complex="Symbol"/>
    </style:style>
    <style:style style:family="text" style:name="T350">
      <style:text-properties fo:font-family="Courier New" style:font-family-asian="Courier New" style:font-family-complex="Courier New"/>
    </style:style>
    <style:style style:family="text" style:name="T351">
      <style:text-properties fo:font-family="Wingdings" style:font-family-asian="Wingdings" style:font-family-complex="Wingdings"/>
    </style:style>
    <style:style style:family="text" style:name="T352">
      <style:text-properties fo:font-family="Symbol" style:font-family-asian="Symbol" style:font-family-complex="Symbol"/>
    </style:style>
    <style:style style:family="text" style:name="T353">
      <style:text-properties fo:font-family="Courier New" style:font-family-asian="Courier New" style:font-family-complex="Courier New"/>
    </style:style>
    <style:style style:family="text" style:name="T354">
      <style:text-properties fo:font-family="Wingdings" style:font-family-asian="Wingdings" style:font-family-complex="Wingdings"/>
    </style:style>
    <style:style style:family="text" style:name="T355">
      <style:text-properties fo:font-family="Symbol" style:font-family-asian="Symbol" style:font-family-complex="Symbol"/>
    </style:style>
    <style:style style:family="text" style:name="T356">
      <style:text-properties fo:font-family="Courier New" style:font-family-asian="Courier New" style:font-family-complex="Courier New"/>
    </style:style>
    <style:style style:family="text" style:name="T357">
      <style:text-properties fo:font-family="Wingdings" style:font-family-asian="Wingdings" style:font-family-complex="Wingdings"/>
    </style:style>
    <style:style style:family="text" style:name="T358">
      <style:text-properties fo:font-family="Symbol" style:font-family-asian="Symbol" style:font-family-complex="Symbol"/>
    </style:style>
    <style:style style:family="text" style:name="T359">
      <style:text-properties fo:font-family="Courier New" style:font-family-asian="Courier New" style:font-family-complex="Courier New"/>
    </style:style>
    <style:style style:family="text" style:name="T360">
      <style:text-properties fo:font-family="Wingdings" style:font-family-asian="Wingdings" style:font-family-complex="Wingdings"/>
    </style:style>
    <style:style style:family="text" style:name="T361">
      <style:text-properties fo:font-family="Symbol" style:font-family-asian="Symbol" style:font-family-complex="Symbol"/>
    </style:style>
    <style:style style:family="text" style:name="T362">
      <style:text-properties fo:font-family="Courier New" style:font-family-asian="Courier New" style:font-family-complex="Courier New"/>
    </style:style>
    <style:style style:family="text" style:name="T363">
      <style:text-properties fo:font-family="Wingdings" style:font-family-asian="Wingdings" style:font-family-complex="Wingdings"/>
    </style:style>
    <style:style style:family="text" style:name="T364">
      <style:text-properties fo:font-family="Symbol" style:font-family-asian="Symbol" style:font-family-complex="Symbol"/>
    </style:style>
    <style:style style:family="text" style:name="T365">
      <style:text-properties fo:font-family="Courier New" style:font-family-asian="Courier New" style:font-family-complex="Courier New"/>
    </style:style>
    <style:style style:family="text" style:name="T366">
      <style:text-properties fo:font-family="Wingdings" style:font-family-asian="Wingdings" style:font-family-complex="Wingdings"/>
    </style:style>
    <style:style style:family="text" style:name="T367">
      <style:text-properties fo:font-family="Symbol" style:font-family-asian="Symbol" style:font-family-complex="Symbol"/>
    </style:style>
    <style:style style:family="text" style:name="T368">
      <style:text-properties fo:font-family="Courier New" style:font-family-asian="Courier New" style:font-family-complex="Courier New"/>
    </style:style>
    <style:style style:family="text" style:name="T369">
      <style:text-properties fo:font-family="Wingdings" style:font-family-asian="Wingdings" style:font-family-complex="Wingdings"/>
    </style:style>
    <style:style style:family="text" style:name="T370">
      <style:text-properties fo:font-family="Symbol" style:font-family-asian="Symbol" style:font-family-complex="Symbol"/>
    </style:style>
    <style:style style:family="text" style:name="T371">
      <style:text-properties fo:font-family="Courier New" style:font-family-asian="Courier New" style:font-family-complex="Courier New"/>
    </style:style>
    <style:style style:family="text" style:name="T372">
      <style:text-properties fo:font-family="Wingdings" style:font-family-asian="Wingdings" style:font-family-complex="Wingdings"/>
    </style:style>
    <style:style style:family="text" style:name="T373">
      <style:text-properties fo:font-family="Symbol" style:font-family-asian="Symbol" style:font-family-complex="Symbol"/>
    </style:style>
    <style:style style:family="text" style:name="T374">
      <style:text-properties fo:font-family="Courier New" style:font-family-asian="Courier New" style:font-family-complex="Courier New"/>
    </style:style>
    <style:style style:family="text" style:name="T375">
      <style:text-properties fo:font-family="Wingdings" style:font-family-asian="Wingdings" style:font-family-complex="Wingdings"/>
    </style:style>
    <style:style style:family="text" style:name="T376">
      <style:text-properties fo:font-family="Symbol" style:font-family-asian="Symbol" style:font-family-complex="Symbol"/>
    </style:style>
    <style:style style:family="text" style:name="T377">
      <style:text-properties fo:font-family="Courier New" style:font-family-asian="Courier New" style:font-family-complex="Courier New"/>
    </style:style>
    <style:style style:family="text" style:name="T378">
      <style:text-properties fo:font-family="Wingdings" style:font-family-asian="Wingdings" style:font-family-complex="Wingdings"/>
    </style:style>
    <style:style style:family="text" style:name="T379">
      <style:text-properties fo:font-family="Symbol" style:font-family-asian="Symbol" style:font-family-complex="Symbol"/>
    </style:style>
    <style:style style:family="text" style:name="T380">
      <style:text-properties fo:font-family="Courier New" style:font-family-asian="Courier New" style:font-family-complex="Courier New"/>
    </style:style>
    <style:style style:family="text" style:name="T381">
      <style:text-properties fo:font-family="Wingdings" style:font-family-asian="Wingdings" style:font-family-complex="Wingdings"/>
    </style:style>
    <style:style style:family="text" style:name="T382">
      <style:text-properties fo:font-family="Symbol" style:font-family-asian="Symbol" style:font-family-complex="Symbol"/>
    </style:style>
    <style:style style:family="text" style:name="T383">
      <style:text-properties fo:font-family="Courier New" style:font-family-asian="Courier New" style:font-family-complex="Courier New"/>
    </style:style>
    <style:style style:family="text" style:name="T384">
      <style:text-properties fo:font-family="Wingdings" style:font-family-asian="Wingdings" style:font-family-complex="Wingdings"/>
    </style:style>
    <style:style style:family="text" style:name="T385">
      <style:text-properties fo:font-family="Symbol" style:font-family-asian="Symbol" style:font-family-complex="Symbol"/>
    </style:style>
    <style:style style:family="text" style:name="T386">
      <style:text-properties fo:font-family="Courier New" style:font-family-asian="Courier New" style:font-family-complex="Courier New"/>
    </style:style>
    <style:style style:family="text" style:name="T387">
      <style:text-properties fo:font-family="Wingdings" style:font-family-asian="Wingdings" style:font-family-complex="Wingdings"/>
    </style:style>
    <style:style style:family="text" style:name="T388">
      <style:text-properties fo:font-family="Symbol" style:font-family-asian="Symbol" style:font-family-complex="Symbol"/>
    </style:style>
    <style:style style:family="text" style:name="T389">
      <style:text-properties fo:font-family="Courier New" style:font-family-asian="Courier New" style:font-family-complex="Courier New"/>
    </style:style>
    <style:style style:family="text" style:name="T390">
      <style:text-properties fo:font-family="Wingdings" style:font-family-asian="Wingdings" style:font-family-complex="Wingdings"/>
    </style:style>
    <style:style style:family="text" style:name="T391">
      <style:text-properties fo:font-family="Symbol" style:font-family-asian="Symbol" style:font-family-complex="Symbol"/>
    </style:style>
    <style:style style:family="text" style:name="T392">
      <style:text-properties fo:font-family="Courier New" style:font-family-asian="Courier New" style:font-family-complex="Courier New"/>
    </style:style>
    <style:style style:family="text" style:name="T393">
      <style:text-properties fo:font-family="Wingdings" style:font-family-asian="Wingdings" style:font-family-complex="Wingdings"/>
    </style:style>
    <style:style style:family="text" style:name="T394">
      <style:text-properties fo:font-family="Symbol" style:font-family-asian="Symbol" style:font-family-complex="Symbol"/>
    </style:style>
    <style:style style:family="text" style:name="T395">
      <style:text-properties fo:font-family="Courier New" style:font-family-asian="Courier New" style:font-family-complex="Courier New"/>
    </style:style>
    <style:style style:family="text" style:name="T396">
      <style:text-properties fo:font-family="Wingdings" style:font-family-asian="Wingdings" style:font-family-complex="Wingdings"/>
    </style:style>
    <style:style style:family="text" style:name="T397">
      <style:text-properties fo:font-family="Symbol" style:font-family-asian="Symbol" style:font-family-complex="Symbol"/>
    </style:style>
    <style:style style:family="text" style:name="T398">
      <style:text-properties fo:font-family="Courier New" style:font-family-asian="Courier New" style:font-family-complex="Courier New"/>
    </style:style>
    <style:style style:family="text" style:name="T399">
      <style:text-properties fo:font-family="Wingdings" style:font-family-asian="Wingdings" style:font-family-complex="Wingdings"/>
    </style:style>
    <style:style style:family="text" style:name="T400">
      <style:text-properties fo:font-family="Symbol" style:font-family-asian="Symbol" style:font-family-complex="Symbol"/>
    </style:style>
    <style:style style:family="text" style:name="T401">
      <style:text-properties fo:font-family="Courier New" style:font-family-asian="Courier New" style:font-family-complex="Courier New"/>
    </style:style>
    <style:style style:family="text" style:name="T402">
      <style:text-properties fo:font-family="Wingdings" style:font-family-asian="Wingdings" style:font-family-complex="Wingdings"/>
    </style:style>
    <style:style style:family="text" style:name="T403">
      <style:text-properties fo:font-family="Symbol" style:font-family-asian="Symbol" style:font-family-complex="Symbol"/>
    </style:style>
    <style:style style:family="text" style:name="T404">
      <style:text-properties fo:font-family="Courier New" style:font-family-asian="Courier New" style:font-family-complex="Courier New"/>
    </style:style>
    <style:style style:family="text" style:name="T405">
      <style:text-properties fo:font-family="Wingdings" style:font-family-asian="Wingdings" style:font-family-complex="Wingdings"/>
    </style:style>
    <style:style style:family="text" style:name="T406">
      <style:text-properties fo:font-family="Symbol" style:font-family-asian="Symbol" style:font-family-complex="Symbol"/>
    </style:style>
    <style:style style:family="text" style:name="T407">
      <style:text-properties fo:font-family="Courier New" style:font-family-asian="Courier New" style:font-family-complex="Courier New"/>
    </style:style>
    <style:style style:family="text" style:name="T408">
      <style:text-properties fo:font-family="Wingdings" style:font-family-asian="Wingdings" style:font-family-complex="Wingdings"/>
    </style:style>
    <style:style style:family="text" style:name="T409">
      <style:text-properties fo:font-family="Symbol" style:font-family-asian="Symbol" style:font-family-complex="Symbol"/>
    </style:style>
    <style:style style:family="text" style:name="T410">
      <style:text-properties fo:font-family="Courier New" style:font-family-asian="Courier New" style:font-family-complex="Courier New"/>
    </style:style>
    <style:style style:family="text" style:name="T411">
      <style:text-properties fo:font-family="Wingdings" style:font-family-asian="Wingdings" style:font-family-complex="Wingdings"/>
    </style:style>
    <style:style style:family="text" style:name="T412">
      <style:text-properties fo:font-family="Symbol" style:font-family-asian="Symbol" style:font-family-complex="Symbol"/>
    </style:style>
    <style:style style:family="text" style:name="T413">
      <style:text-properties fo:font-family="Courier New" style:font-family-asian="Courier New" style:font-family-complex="Courier New"/>
    </style:style>
    <style:style style:family="text" style:name="T414">
      <style:text-properties fo:font-family="Wingdings" style:font-family-asian="Wingdings" style:font-family-complex="Wingdings"/>
    </style:style>
    <style:style style:family="text" style:name="T415">
      <style:text-properties fo:font-family="Symbol" style:font-family-asian="Symbol" style:font-family-complex="Symbol"/>
    </style:style>
    <style:style style:family="text" style:name="T416">
      <style:text-properties fo:font-family="Courier New" style:font-family-asian="Courier New" style:font-family-complex="Courier New"/>
    </style:style>
    <style:style style:family="text" style:name="T417">
      <style:text-properties fo:font-family="Wingdings" style:font-family-asian="Wingdings" style:font-family-complex="Wingdings"/>
    </style:style>
    <style:style style:family="text" style:name="T418">
      <style:text-properties fo:font-family="Symbol" style:font-family-asian="Symbol" style:font-family-complex="Symbol"/>
    </style:style>
    <style:style style:family="text" style:name="T419">
      <style:text-properties fo:font-family="Courier New" style:font-family-asian="Courier New" style:font-family-complex="Courier New"/>
    </style:style>
    <style:style style:family="text" style:name="T420">
      <style:text-properties fo:font-family="Wingdings" style:font-family-asian="Wingdings" style:font-family-complex="Wingdings"/>
    </style:style>
    <style:style style:family="text" style:name="T421">
      <style:text-properties fo:font-family="Symbol" style:font-family-asian="Symbol" style:font-family-complex="Symbol"/>
    </style:style>
    <style:style style:family="text" style:name="T422">
      <style:text-properties fo:font-family="Courier New" style:font-family-asian="Courier New" style:font-family-complex="Courier New"/>
    </style:style>
    <style:style style:family="text" style:name="T423">
      <style:text-properties fo:font-family="Wingdings" style:font-family-asian="Wingdings" style:font-family-complex="Wingdings"/>
    </style:style>
    <style:style style:family="text" style:name="T424">
      <style:text-properties fo:font-family="Symbol" style:font-family-asian="Symbol" style:font-family-complex="Symbol"/>
    </style:style>
    <style:style style:family="text" style:name="T425">
      <style:text-properties fo:font-family="Courier New" style:font-family-asian="Courier New" style:font-family-complex="Courier New"/>
    </style:style>
    <style:style style:family="text" style:name="T426">
      <style:text-properties fo:font-family="Wingdings" style:font-family-asian="Wingdings" style:font-family-complex="Wingdings"/>
    </style:style>
    <style:style style:family="text" style:name="T427">
      <style:text-properties fo:font-family="Symbol" style:font-family-asian="Symbol" style:font-family-complex="Symbol"/>
    </style:style>
    <style:style style:family="text" style:name="T428">
      <style:text-properties fo:font-family="Courier New" style:font-family-asian="Courier New" style:font-family-complex="Courier New"/>
    </style:style>
    <style:style style:family="text" style:name="T429">
      <style:text-properties fo:font-family="Wingdings" style:font-family-asian="Wingdings" style:font-family-complex="Wingdings"/>
    </style:style>
    <style:style style:family="text" style:name="T430">
      <style:text-properties fo:font-family="Symbol" style:font-family-asian="Symbol" style:font-family-complex="Symbol"/>
    </style:style>
    <style:style style:family="text" style:name="T431">
      <style:text-properties fo:font-family="Courier New" style:font-family-asian="Courier New" style:font-family-complex="Courier New"/>
    </style:style>
    <style:style style:family="text" style:name="T432">
      <style:text-properties fo:font-family="Wingdings" style:font-family-asian="Wingdings" style:font-family-complex="Wingdings"/>
    </style:style>
    <style:style style:family="text" style:name="T433">
      <style:text-properties fo:font-family="Symbol" style:font-family-asian="Symbol" style:font-family-complex="Symbol"/>
    </style:style>
    <style:style style:family="text" style:name="T434">
      <style:text-properties fo:font-family="Courier New" style:font-family-asian="Courier New" style:font-family-complex="Courier New"/>
    </style:style>
    <style:style style:family="text" style:name="T435">
      <style:text-properties fo:font-family="Wingdings" style:font-family-asian="Wingdings" style:font-family-complex="Wingdings"/>
    </style:style>
    <style:style style:family="text" style:name="T436">
      <style:text-properties fo:font-family="Symbol" style:font-family-asian="Symbol" style:font-family-complex="Symbol"/>
    </style:style>
    <style:style style:family="text" style:name="T437">
      <style:text-properties fo:font-family="Courier New" style:font-family-asian="Courier New" style:font-family-complex="Courier New"/>
    </style:style>
    <style:style style:family="text" style:name="T438">
      <style:text-properties fo:font-family="Wingdings" style:font-family-asian="Wingdings" style:font-family-complex="Wingdings"/>
    </style:style>
    <style:style style:family="text" style:name="T439">
      <style:text-properties fo:font-family="Symbol" style:font-family-asian="Symbol" style:font-family-complex="Symbol"/>
    </style:style>
    <style:style style:family="text" style:name="T440">
      <style:text-properties fo:font-family="Courier New" style:font-family-asian="Courier New" style:font-family-complex="Courier New"/>
    </style:style>
    <style:style style:family="text" style:name="T441">
      <style:text-properties fo:font-family="Wingdings" style:font-family-asian="Wingdings" style:font-family-complex="Wingdings"/>
    </style:style>
    <style:style style:family="text" style:name="T442">
      <style:text-properties fo:font-family="Symbol" style:font-family-asian="Symbol" style:font-family-complex="Symbol"/>
    </style:style>
    <style:style style:family="text" style:name="T443">
      <style:text-properties fo:font-family="Courier New" style:font-family-asian="Courier New" style:font-family-complex="Courier New"/>
    </style:style>
    <style:style style:family="text" style:name="T444">
      <style:text-properties fo:font-family="Wingdings" style:font-family-asian="Wingdings" style:font-family-complex="Wingdings"/>
    </style:style>
    <style:style style:family="text" style:name="T445">
      <style:text-properties fo:font-family="Symbol" style:font-family-asian="Symbol" style:font-family-complex="Symbol"/>
    </style:style>
    <style:style style:family="text" style:name="T446">
      <style:text-properties fo:font-family="Courier New" style:font-family-asian="Courier New" style:font-family-complex="Courier New"/>
    </style:style>
    <style:style style:family="text" style:name="T447">
      <style:text-properties fo:font-family="Wingdings" style:font-family-asian="Wingdings" style:font-family-complex="Wingdings"/>
    </style:style>
    <style:style style:family="text" style:name="T448">
      <style:text-properties fo:font-family="Symbol" style:font-family-asian="Symbol" style:font-family-complex="Symbol"/>
    </style:style>
    <style:style style:family="text" style:name="T449">
      <style:text-properties fo:font-family="Courier New" style:font-family-asian="Courier New" style:font-family-complex="Courier New"/>
    </style:style>
    <style:style style:family="text" style:name="T450">
      <style:text-properties fo:font-family="Wingdings" style:font-family-asian="Wingdings" style:font-family-complex="Wingdings"/>
    </style:style>
    <style:style style:family="text" style:name="T451">
      <style:text-properties fo:font-family="Symbol" style:font-family-asian="Symbol" style:font-family-complex="Symbol"/>
    </style:style>
    <style:style style:family="text" style:name="T452">
      <style:text-properties fo:font-family="Courier New" style:font-family-asian="Courier New" style:font-family-complex="Courier New"/>
    </style:style>
    <style:style style:family="text" style:name="T453">
      <style:text-properties fo:font-family="Wingdings" style:font-family-asian="Wingdings" style:font-family-complex="Wingdings"/>
    </style:style>
    <style:style style:family="text" style:name="T454">
      <style:text-properties fo:font-family="Symbol" style:font-family-asian="Symbol" style:font-family-complex="Symbol"/>
    </style:style>
    <style:style style:family="text" style:name="T455">
      <style:text-properties fo:font-family="Courier New" style:font-family-asian="Courier New" style:font-family-complex="Courier New"/>
    </style:style>
    <style:style style:family="text" style:name="T456">
      <style:text-properties fo:font-family="Wingdings" style:font-family-asian="Wingdings" style:font-family-complex="Wingdings"/>
    </style:style>
    <style:style style:family="text" style:name="T457">
      <style:text-properties fo:font-family="Symbol" style:font-family-asian="Symbol" style:font-family-complex="Symbol"/>
    </style:style>
    <style:style style:family="text" style:name="T458">
      <style:text-properties fo:font-family="Courier New" style:font-family-asian="Courier New" style:font-family-complex="Courier New"/>
    </style:style>
    <style:style style:family="text" style:name="T459">
      <style:text-properties fo:font-family="Wingdings" style:font-family-asian="Wingdings" style:font-family-complex="Wingdings"/>
    </style:style>
    <style:style style:family="text" style:name="T460">
      <style:text-properties fo:font-family="Symbol" style:font-family-asian="Symbol" style:font-family-complex="Symbol"/>
    </style:style>
    <style:style style:family="text" style:name="T461">
      <style:text-properties fo:font-family="Courier New" style:font-family-asian="Courier New" style:font-family-complex="Courier New"/>
    </style:style>
    <style:style style:family="text" style:name="T462">
      <style:text-properties fo:font-family="Wingdings" style:font-family-asian="Wingdings" style:font-family-complex="Wingdings"/>
    </style:style>
    <style:style style:family="text" style:name="T463">
      <style:text-properties fo:font-family="Symbol" style:font-family-asian="Symbol" style:font-family-complex="Symbol"/>
    </style:style>
    <style:style style:family="text" style:name="T464">
      <style:text-properties fo:font-family="Courier New" style:font-family-asian="Courier New" style:font-family-complex="Courier New"/>
    </style:style>
    <style:style style:family="text" style:name="T465">
      <style:text-properties fo:font-family="Wingdings" style:font-family-asian="Wingdings" style:font-family-complex="Wingdings"/>
    </style:style>
    <style:style style:family="text" style:name="T466">
      <style:text-properties fo:font-family="Symbol" style:font-family-asian="Symbol" style:font-family-complex="Symbol"/>
    </style:style>
    <style:style style:family="text" style:name="T467">
      <style:text-properties fo:font-family="Courier New" style:font-family-asian="Courier New" style:font-family-complex="Courier New"/>
    </style:style>
    <style:style style:family="text" style:name="T468">
      <style:text-properties fo:font-family="Wingdings" style:font-family-asian="Wingdings" style:font-family-complex="Wingdings"/>
    </style:style>
    <style:style style:family="text" style:name="T469">
      <style:text-properties fo:font-family="Symbol" style:font-family-asian="Symbol" style:font-family-complex="Symbol"/>
    </style:style>
    <style:style style:family="text" style:name="T470">
      <style:text-properties fo:font-family="Courier New" style:font-family-asian="Courier New" style:font-family-complex="Courier New"/>
    </style:style>
    <style:style style:family="text" style:name="T471">
      <style:text-properties fo:font-family="Wingdings" style:font-family-asian="Wingdings" style:font-family-complex="Wingdings"/>
    </style:style>
    <style:style style:family="text" style:name="T472">
      <style:text-properties fo:font-family="Symbol" style:font-family-asian="Symbol" style:font-family-complex="Symbol"/>
    </style:style>
    <style:style style:family="text" style:name="T473">
      <style:text-properties fo:font-family="Courier New" style:font-family-asian="Courier New" style:font-family-complex="Courier New"/>
    </style:style>
    <style:style style:family="text" style:name="T474">
      <style:text-properties fo:font-family="Wingdings" style:font-family-asian="Wingdings" style:font-family-complex="Wingdings"/>
    </style:style>
    <style:style style:family="text" style:name="T475">
      <style:text-properties fo:font-family="Symbol" style:font-family-asian="Symbol" style:font-family-complex="Symbol"/>
    </style:style>
    <style:style style:family="text" style:name="T476">
      <style:text-properties fo:font-family="Courier New" style:font-family-asian="Courier New" style:font-family-complex="Courier New"/>
    </style:style>
    <style:style style:family="text" style:name="T477">
      <style:text-properties fo:font-family="Wingdings" style:font-family-asian="Wingdings" style:font-family-complex="Wingdings"/>
    </style:style>
    <style:style style:family="text" style:name="T478">
      <style:text-properties fo:font-family="Symbol" style:font-family-asian="Symbol" style:font-family-complex="Symbol"/>
    </style:style>
    <style:style style:family="text" style:name="T479">
      <style:text-properties fo:font-family="Courier New" style:font-family-asian="Courier New" style:font-family-complex="Courier New"/>
    </style:style>
    <style:style style:family="text" style:name="T480">
      <style:text-properties fo:font-family="Wingdings" style:font-family-asian="Wingdings" style:font-family-complex="Wingdings"/>
    </style:style>
    <style:style style:family="text" style:name="T481">
      <style:text-properties fo:font-family="Symbol" style:font-family-asian="Symbol" style:font-family-complex="Symbol"/>
    </style:style>
    <style:style style:family="text" style:name="T482">
      <style:text-properties fo:font-family="Courier New" style:font-family-asian="Courier New" style:font-family-complex="Courier New"/>
    </style:style>
    <style:style style:family="text" style:name="T483">
      <style:text-properties fo:font-family="Wingdings" style:font-family-asian="Wingdings" style:font-family-complex="Wingdings"/>
    </style:style>
    <style:style style:family="text" style:name="T484">
      <style:text-properties fo:font-family="Symbol" style:font-family-asian="Symbol" style:font-family-complex="Symbol"/>
    </style:style>
    <style:style style:family="text" style:name="T485">
      <style:text-properties fo:font-family="Courier New" style:font-family-asian="Courier New" style:font-family-complex="Courier New"/>
    </style:style>
    <style:style style:family="text" style:name="T486">
      <style:text-properties fo:font-family="Wingdings" style:font-family-asian="Wingdings" style:font-family-complex="Wingdings"/>
    </style:style>
    <style:style style:family="text" style:name="T487">
      <style:text-properties fo:font-family="Symbol" style:font-family-asian="Symbol" style:font-family-complex="Symbol"/>
    </style:style>
    <style:style style:family="text" style:name="T488">
      <style:text-properties fo:font-family="Courier New" style:font-family-asian="Courier New" style:font-family-complex="Courier New"/>
    </style:style>
    <style:style style:family="text" style:name="T489">
      <style:text-properties fo:font-family="Wingdings" style:font-family-asian="Wingdings" style:font-family-complex="Wingdings"/>
    </style:style>
    <style:style style:family="text" style:name="T490">
      <style:text-properties fo:font-family="Symbol" style:font-family-asian="Symbol" style:font-family-complex="Symbol"/>
    </style:style>
    <style:style style:family="text" style:name="T491">
      <style:text-properties fo:font-family="Courier New" style:font-family-asian="Courier New" style:font-family-complex="Courier New"/>
    </style:style>
    <style:style style:family="text" style:name="T492">
      <style:text-properties fo:font-family="Wingdings" style:font-family-asian="Wingdings" style:font-family-complex="Wingdings"/>
    </style:style>
    <style:style style:family="text" style:name="T493">
      <style:text-properties fo:font-family="Symbol" style:font-family-asian="Symbol" style:font-family-complex="Symbol"/>
    </style:style>
    <style:style style:family="text" style:name="T494">
      <style:text-properties fo:font-family="Courier New" style:font-family-asian="Courier New" style:font-family-complex="Courier New"/>
    </style:style>
    <style:style style:family="text" style:name="T495">
      <style:text-properties fo:font-family="Wingdings" style:font-family-asian="Wingdings" style:font-family-complex="Wingdings"/>
    </style:style>
    <style:style style:family="text" style:name="T496">
      <style:text-properties fo:font-family="Symbol" style:font-family-asian="Symbol" style:font-family-complex="Symbol"/>
    </style:style>
    <style:style style:family="text" style:name="T497">
      <style:text-properties fo:font-family="Courier New" style:font-family-asian="Courier New" style:font-family-complex="Courier New"/>
    </style:style>
    <style:style style:family="text" style:name="T498">
      <style:text-properties fo:font-family="Wingdings" style:font-family-asian="Wingdings" style:font-family-complex="Wingdings"/>
    </style:style>
    <style:style style:family="text" style:name="T499">
      <style:text-properties fo:font-family="Symbol" style:font-family-asian="Symbol" style:font-family-complex="Symbol"/>
    </style:style>
    <style:style style:family="text" style:name="T500">
      <style:text-properties fo:font-family="Courier New" style:font-family-asian="Courier New" style:font-family-complex="Courier New"/>
    </style:style>
    <style:style style:family="text" style:name="T501">
      <style:text-properties fo:font-family="Wingdings" style:font-family-asian="Wingdings" style:font-family-complex="Wingdings"/>
    </style:style>
    <style:style style:family="text" style:name="T502">
      <style:text-properties fo:font-family="Symbol" style:font-family-asian="Symbol" style:font-family-complex="Symbol"/>
    </style:style>
    <style:style style:family="text" style:name="T503">
      <style:text-properties fo:font-family="Courier New" style:font-family-asian="Courier New" style:font-family-complex="Courier New"/>
    </style:style>
    <style:style style:family="text" style:name="T504">
      <style:text-properties fo:font-family="Wingdings" style:font-family-asian="Wingdings" style:font-family-complex="Wingdings"/>
    </style:style>
    <style:style style:family="text" style:name="T505">
      <style:text-properties fo:font-family="Symbol" style:font-family-asian="Symbol" style:font-family-complex="Symbol"/>
    </style:style>
    <style:style style:family="text" style:name="T506">
      <style:text-properties fo:font-family="Courier New" style:font-family-asian="Courier New" style:font-family-complex="Courier New"/>
    </style:style>
    <style:style style:family="text" style:name="T507">
      <style:text-properties fo:font-family="Wingdings" style:font-family-asian="Wingdings" style:font-family-complex="Wingdings"/>
    </style:style>
    <style:style style:family="text" style:name="T508">
      <style:text-properties fo:font-family="Symbol" style:font-family-asian="Symbol" style:font-family-complex="Symbol"/>
    </style:style>
    <style:style style:family="text" style:name="T509">
      <style:text-properties fo:font-family="Courier New" style:font-family-asian="Courier New" style:font-family-complex="Courier New"/>
    </style:style>
    <style:style style:family="text" style:name="T510">
      <style:text-properties fo:font-family="Wingdings" style:font-family-asian="Wingdings" style:font-family-complex="Wingdings"/>
    </style:style>
    <style:style style:family="text" style:name="T511">
      <style:text-properties fo:font-family="Symbol" style:font-family-asian="Symbol" style:font-family-complex="Symbol"/>
    </style:style>
    <style:style style:family="text" style:name="T512">
      <style:text-properties fo:font-family="Courier New" style:font-family-asian="Courier New" style:font-family-complex="Courier New"/>
    </style:style>
    <style:style style:family="text" style:name="T513">
      <style:text-properties fo:font-family="Wingdings" style:font-family-asian="Wingdings" style:font-family-complex="Wingdings"/>
    </style:style>
    <style:style style:family="text" style:name="T514">
      <style:text-properties fo:font-family="Symbol" style:font-family-asian="Symbol" style:font-family-complex="Symbol"/>
    </style:style>
    <style:style style:family="text" style:name="T515">
      <style:text-properties fo:font-family="Courier New" style:font-family-asian="Courier New" style:font-family-complex="Courier New"/>
    </style:style>
    <style:style style:family="text" style:name="T516">
      <style:text-properties fo:font-family="Wingdings" style:font-family-asian="Wingdings" style:font-family-complex="Wingdings"/>
    </style:style>
    <style:style style:family="text" style:name="T517">
      <style:text-properties fo:font-family="Symbol" style:font-family-asian="Symbol" style:font-family-complex="Symbol"/>
    </style:style>
    <style:style style:family="text" style:name="T518">
      <style:text-properties fo:font-family="Courier New" style:font-family-asian="Courier New" style:font-family-complex="Courier New"/>
    </style:style>
    <style:style style:family="text" style:name="T519">
      <style:text-properties fo:font-family="Wingdings" style:font-family-asian="Wingdings" style:font-family-complex="Wingdings"/>
    </style:style>
    <style:style style:family="text" style:name="T520">
      <style:text-properties fo:font-family="Symbol" style:font-family-asian="Symbol" style:font-family-complex="Symbol"/>
    </style:style>
    <style:style style:family="text" style:name="T521">
      <style:text-properties fo:font-family="Courier New" style:font-family-asian="Courier New" style:font-family-complex="Courier New"/>
    </style:style>
    <style:style style:family="text" style:name="T522">
      <style:text-properties fo:font-family="Wingdings" style:font-family-asian="Wingdings" style:font-family-complex="Wingdings"/>
    </style:style>
    <style:style style:family="text" style:name="T523">
      <style:text-properties fo:font-family="Symbol" style:font-family-asian="Symbol" style:font-family-complex="Symbol"/>
    </style:style>
    <style:style style:family="text" style:name="T524">
      <style:text-properties fo:font-family="Courier New" style:font-family-asian="Courier New" style:font-family-complex="Courier New"/>
    </style:style>
    <style:style style:family="text" style:name="T525">
      <style:text-properties fo:font-family="Wingdings" style:font-family-asian="Wingdings" style:font-family-complex="Wingdings"/>
    </style:style>
    <style:style style:family="text" style:name="T526">
      <style:text-properties fo:font-family="Symbol" style:font-family-asian="Symbol" style:font-family-complex="Symbol"/>
    </style:style>
    <style:style style:family="text" style:name="T527">
      <style:text-properties fo:font-family="Courier New" style:font-family-asian="Courier New" style:font-family-complex="Courier New"/>
    </style:style>
    <style:style style:family="text" style:name="T528">
      <style:text-properties fo:font-family="Wingdings" style:font-family-asian="Wingdings" style:font-family-complex="Wingdings"/>
    </style:style>
    <style:style style:family="text" style:name="T529">
      <style:text-properties fo:font-family="Symbol" style:font-family-asian="Symbol" style:font-family-complex="Symbol"/>
    </style:style>
    <style:style style:family="text" style:name="T530">
      <style:text-properties fo:font-family="Courier New" style:font-family-asian="Courier New" style:font-family-complex="Courier New"/>
    </style:style>
    <style:style style:family="text" style:name="T531">
      <style:text-properties fo:font-family="Wingdings" style:font-family-asian="Wingdings" style:font-family-complex="Wingdings"/>
    </style:style>
    <style:style style:family="text" style:name="T532">
      <style:text-properties fo:font-family="Symbol" style:font-family-asian="Symbol" style:font-family-complex="Symbol"/>
    </style:style>
    <style:style style:family="text" style:name="T533">
      <style:text-properties fo:font-family="Courier New" style:font-family-asian="Courier New" style:font-family-complex="Courier New"/>
    </style:style>
    <style:style style:family="text" style:name="T534">
      <style:text-properties fo:font-family="Wingdings" style:font-family-asian="Wingdings" style:font-family-complex="Wingdings"/>
    </style:style>
    <style:style style:family="text" style:name="T535">
      <style:text-properties fo:font-family="Symbol" style:font-family-asian="Symbol" style:font-family-complex="Symbol"/>
    </style:style>
    <style:style style:family="text" style:name="T536">
      <style:text-properties fo:font-family="Courier New" style:font-family-asian="Courier New" style:font-family-complex="Courier New"/>
    </style:style>
    <style:style style:family="text" style:name="T537">
      <style:text-properties fo:font-family="Wingdings" style:font-family-asian="Wingdings" style:font-family-complex="Wingdings"/>
    </style:style>
    <style:style style:family="text" style:name="T538">
      <style:text-properties fo:font-family="Symbol" style:font-family-asian="Symbol" style:font-family-complex="Symbol"/>
    </style:style>
    <style:style style:family="text" style:name="T539">
      <style:text-properties fo:font-family="Courier New" style:font-family-asian="Courier New" style:font-family-complex="Courier New"/>
    </style:style>
    <style:style style:family="text" style:name="T540">
      <style:text-properties fo:font-family="Wingdings" style:font-family-asian="Wingdings" style:font-family-complex="Wingdings"/>
    </style:style>
    <style:style style:family="text" style:name="T541">
      <style:text-properties fo:font-family="Symbol" style:font-family-asian="Symbol" style:font-family-complex="Symbol"/>
    </style:style>
    <style:style style:family="text" style:name="T542">
      <style:text-properties fo:font-family="Courier New" style:font-family-asian="Courier New" style:font-family-complex="Courier New"/>
    </style:style>
    <style:style style:family="text" style:name="T543">
      <style:text-properties fo:font-family="Wingdings" style:font-family-asian="Wingdings" style:font-family-complex="Wingdings"/>
    </style:style>
    <style:style style:family="text" style:name="T544">
      <style:text-properties fo:font-family="Symbol" style:font-family-asian="Symbol" style:font-family-complex="Symbol"/>
    </style:style>
    <style:style style:family="text" style:name="T545">
      <style:text-properties fo:font-family="Courier New" style:font-family-asian="Courier New" style:font-family-complex="Courier New"/>
    </style:style>
    <style:style style:family="text" style:name="T546">
      <style:text-properties fo:font-family="Wingdings" style:font-family-asian="Wingdings" style:font-family-complex="Wingdings"/>
    </style:style>
    <style:style style:family="text" style:name="T547">
      <style:text-properties fo:font-family="Symbol" style:font-family-asian="Symbol" style:font-family-complex="Symbol"/>
    </style:style>
    <style:style style:family="text" style:name="T548">
      <style:text-properties fo:font-family="Courier New" style:font-family-asian="Courier New" style:font-family-complex="Courier New"/>
    </style:style>
    <style:style style:family="text" style:name="T549">
      <style:text-properties fo:font-family="Wingdings" style:font-family-asian="Wingdings" style:font-family-complex="Wingdings"/>
    </style:style>
    <style:style style:family="text" style:name="T550">
      <style:text-properties fo:font-family="Symbol" style:font-family-asian="Symbol" style:font-family-complex="Symbol"/>
    </style:style>
    <style:style style:family="text" style:name="T551">
      <style:text-properties fo:font-family="Courier New" style:font-family-asian="Courier New" style:font-family-complex="Courier New"/>
    </style:style>
    <style:style style:family="text" style:name="T552">
      <style:text-properties fo:font-family="Wingdings" style:font-family-asian="Wingdings" style:font-family-complex="Wingdings"/>
    </style:style>
    <style:style style:family="text" style:name="T553">
      <style:text-properties fo:font-family="Symbol" style:font-family-asian="Symbol" style:font-family-complex="Symbol"/>
    </style:style>
    <style:style style:family="text" style:name="T554">
      <style:text-properties fo:font-family="Courier New" style:font-family-asian="Courier New" style:font-family-complex="Courier New"/>
    </style:style>
    <style:style style:family="text" style:name="T555">
      <style:text-properties fo:font-family="Wingdings" style:font-family-asian="Wingdings" style:font-family-complex="Wingdings"/>
    </style:style>
    <style:style style:family="text" style:name="T556">
      <style:text-properties fo:font-family="Symbol" style:font-family-asian="Symbol" style:font-family-complex="Symbol"/>
    </style:style>
    <style:style style:family="text" style:name="T557">
      <style:text-properties fo:font-family="Courier New" style:font-family-asian="Courier New" style:font-family-complex="Courier New"/>
    </style:style>
    <style:style style:family="text" style:name="T558">
      <style:text-properties fo:font-family="Wingdings" style:font-family-asian="Wingdings" style:font-family-complex="Wingdings"/>
    </style:style>
    <style:style style:family="text" style:name="T559">
      <style:text-properties fo:font-family="Symbol" style:font-family-asian="Symbol" style:font-family-complex="Symbol"/>
    </style:style>
    <style:style style:family="text" style:name="T560">
      <style:text-properties fo:font-family="Courier New" style:font-family-asian="Courier New" style:font-family-complex="Courier New"/>
    </style:style>
    <style:style style:family="text" style:name="T561">
      <style:text-properties fo:font-family="Wingdings" style:font-family-asian="Wingdings" style:font-family-complex="Wingdings"/>
    </style:style>
    <style:style style:family="text" style:name="T562">
      <style:text-properties fo:font-family="Symbol" style:font-family-asian="Symbol" style:font-family-complex="Symbol"/>
    </style:style>
    <style:style style:family="text" style:name="T563">
      <style:text-properties fo:font-family="Courier New" style:font-family-asian="Courier New" style:font-family-complex="Courier New"/>
    </style:style>
    <style:style style:family="text" style:name="T564">
      <style:text-properties fo:font-family="Wingdings" style:font-family-asian="Wingdings" style:font-family-complex="Wingdings"/>
    </style:style>
    <style:style style:family="text" style:name="T565">
      <style:text-properties fo:font-family="Symbol" style:font-family-asian="Symbol" style:font-family-complex="Symbol"/>
    </style:style>
    <style:style style:family="text" style:name="T566">
      <style:text-properties fo:font-family="Courier New" style:font-family-asian="Courier New" style:font-family-complex="Courier New"/>
    </style:style>
    <style:style style:family="text" style:name="T567">
      <style:text-properties fo:font-family="Wingdings" style:font-family-asian="Wingdings" style:font-family-complex="Wingdings"/>
    </style:style>
    <style:style style:family="text" style:name="T568">
      <style:text-properties fo:font-family="Symbol" style:font-family-asian="Symbol" style:font-family-complex="Symbol"/>
    </style:style>
    <style:style style:family="text" style:name="T569">
      <style:text-properties fo:font-family="Courier New" style:font-family-asian="Courier New" style:font-family-complex="Courier New"/>
    </style:style>
    <style:style style:family="text" style:name="T570">
      <style:text-properties fo:font-family="Wingdings" style:font-family-asian="Wingdings" style:font-family-complex="Wingdings"/>
    </style:style>
    <style:style style:family="text" style:name="T571">
      <style:text-properties fo:font-family="Symbol" style:font-family-asian="Symbol" style:font-family-complex="Symbol"/>
    </style:style>
    <style:style style:family="text" style:name="T572">
      <style:text-properties fo:font-family="Courier New" style:font-family-asian="Courier New" style:font-family-complex="Courier New"/>
    </style:style>
    <style:style style:family="text" style:name="T573">
      <style:text-properties fo:font-family="Wingdings" style:font-family-asian="Wingdings" style:font-family-complex="Wingdings"/>
    </style:style>
    <style:style style:family="text" style:name="T574">
      <style:text-properties fo:font-family="Symbol" style:font-family-asian="Symbol" style:font-family-complex="Symbol"/>
    </style:style>
    <style:style style:family="text" style:name="T575">
      <style:text-properties fo:font-family="Courier New" style:font-family-asian="Courier New" style:font-family-complex="Courier New"/>
    </style:style>
    <style:style style:family="text" style:name="T576">
      <style:text-properties fo:font-family="Wingdings" style:font-family-asian="Wingdings" style:font-family-complex="Wingdings"/>
    </style:style>
    <style:style style:family="text" style:name="T577">
      <style:text-properties fo:font-family="Symbol" style:font-family-asian="Symbol" style:font-family-complex="Symbol"/>
    </style:style>
    <style:style style:family="text" style:name="T578">
      <style:text-properties fo:font-family="Courier New" style:font-family-asian="Courier New" style:font-family-complex="Courier New"/>
    </style:style>
    <style:style style:family="text" style:name="T579">
      <style:text-properties fo:font-family="Wingdings" style:font-family-asian="Wingdings" style:font-family-complex="Wingdings"/>
    </style:style>
    <style:style style:family="text" style:name="T580">
      <style:text-properties fo:font-family="Symbol" style:font-family-asian="Symbol" style:font-family-complex="Symbol"/>
    </style:style>
    <style:style style:family="text" style:name="T581">
      <style:text-properties fo:font-family="Courier New" style:font-family-asian="Courier New" style:font-family-complex="Courier New"/>
    </style:style>
    <style:style style:family="text" style:name="T582">
      <style:text-properties fo:font-family="Wingdings" style:font-family-asian="Wingdings" style:font-family-complex="Wingdings"/>
    </style:style>
    <style:style style:family="text" style:name="T583">
      <style:text-properties fo:font-family="Symbol" style:font-family-asian="Symbol" style:font-family-complex="Symbol"/>
    </style:style>
    <style:style style:family="text" style:name="T584">
      <style:text-properties fo:font-family="Courier New" style:font-family-asian="Courier New" style:font-family-complex="Courier New"/>
    </style:style>
    <style:style style:family="text" style:name="T585">
      <style:text-properties fo:font-family="Wingdings" style:font-family-asian="Wingdings" style:font-family-complex="Wingdings"/>
    </style:style>
    <style:style style:family="text" style:name="T586">
      <style:text-properties fo:font-family="Symbol" style:font-family-asian="Symbol" style:font-family-complex="Symbol"/>
    </style:style>
    <style:style style:family="text" style:name="T587">
      <style:text-properties fo:font-family="Courier New" style:font-family-asian="Courier New" style:font-family-complex="Courier New"/>
    </style:style>
    <style:style style:family="text" style:name="T588">
      <style:text-properties fo:font-family="Wingdings" style:font-family-asian="Wingdings" style:font-family-complex="Wingdings"/>
    </style:style>
    <style:style style:family="text" style:name="T589">
      <style:text-properties fo:font-family="Symbol" style:font-family-asian="Symbol" style:font-family-complex="Symbol"/>
    </style:style>
    <style:style style:family="text" style:name="T590">
      <style:text-properties fo:font-family="Courier New" style:font-family-asian="Courier New" style:font-family-complex="Courier New"/>
    </style:style>
    <style:style style:family="text" style:name="T591">
      <style:text-properties fo:font-family="Wingdings" style:font-family-asian="Wingdings" style:font-family-complex="Wingdings"/>
    </style:style>
    <style:style style:family="text" style:name="T592">
      <style:text-properties fo:font-family="Symbol" style:font-family-asian="Symbol" style:font-family-complex="Symbol"/>
    </style:style>
    <style:style style:family="text" style:name="T593">
      <style:text-properties fo:font-family="Courier New" style:font-family-asian="Courier New" style:font-family-complex="Courier New"/>
    </style:style>
    <style:style style:family="text" style:name="T594">
      <style:text-properties fo:font-family="Wingdings" style:font-family-asian="Wingdings" style:font-family-complex="Wingdings"/>
    </style:style>
    <style:style style:family="text" style:name="T595">
      <style:text-properties fo:font-family="Symbol" style:font-family-asian="Symbol" style:font-family-complex="Symbol"/>
    </style:style>
    <style:style style:family="text" style:name="T596">
      <style:text-properties fo:font-family="Courier New" style:font-family-asian="Courier New" style:font-family-complex="Courier New"/>
    </style:style>
    <style:style style:family="text" style:name="T597">
      <style:text-properties fo:font-family="Wingdings" style:font-family-asian="Wingdings" style:font-family-complex="Wingdings"/>
    </style:style>
    <style:style style:family="text" style:name="T598">
      <style:text-properties fo:font-family="Symbol" style:font-family-asian="Symbol" style:font-family-complex="Symbol"/>
    </style:style>
    <style:style style:family="text" style:name="T599">
      <style:text-properties fo:font-family="Courier New" style:font-family-asian="Courier New" style:font-family-complex="Courier New"/>
    </style:style>
    <style:style style:family="text" style:name="T600">
      <style:text-properties fo:font-family="Wingdings" style:font-family-asian="Wingdings" style:font-family-complex="Wingdings"/>
    </style:style>
    <style:style style:family="text" style:name="T601">
      <style:text-properties fo:font-family="Symbol" style:font-family-asian="Symbol" style:font-family-complex="Symbol"/>
    </style:style>
    <style:style style:family="text" style:name="T602">
      <style:text-properties fo:font-family="Courier New" style:font-family-asian="Courier New" style:font-family-complex="Courier New"/>
    </style:style>
    <style:style style:family="text" style:name="T603">
      <style:text-properties fo:font-family="Wingdings" style:font-family-asian="Wingdings" style:font-family-complex="Wingdings"/>
    </style:style>
    <style:style style:family="text" style:name="T604">
      <style:text-properties fo:font-family="Symbol" style:font-family-asian="Symbol" style:font-family-complex="Symbol"/>
    </style:style>
    <style:style style:family="text" style:name="T605">
      <style:text-properties fo:font-family="Courier New" style:font-family-asian="Courier New" style:font-family-complex="Courier New"/>
    </style:style>
    <style:style style:family="text" style:name="T606">
      <style:text-properties fo:font-family="Wingdings" style:font-family-asian="Wingdings" style:font-family-complex="Wingdings"/>
    </style:style>
    <style:style style:family="text" style:name="T607">
      <style:text-properties fo:font-family="Symbol" style:font-family-asian="Symbol" style:font-family-complex="Symbol"/>
    </style:style>
    <style:style style:family="text" style:name="T608">
      <style:text-properties fo:font-family="Courier New" style:font-family-asian="Courier New" style:font-family-complex="Courier New"/>
    </style:style>
    <style:style style:family="text" style:name="T609">
      <style:text-properties fo:font-family="Wingdings" style:font-family-asian="Wingdings" style:font-family-complex="Wingdings"/>
    </style:style>
    <style:style style:family="text" style:name="T610">
      <style:text-properties fo:font-family="Symbol" style:font-family-asian="Symbol" style:font-family-complex="Symbol"/>
    </style:style>
    <style:style style:family="text" style:name="T611">
      <style:text-properties fo:font-family="Courier New" style:font-family-asian="Courier New" style:font-family-complex="Courier New"/>
    </style:style>
    <style:style style:family="text" style:name="T612">
      <style:text-properties fo:font-family="Wingdings" style:font-family-asian="Wingdings" style:font-family-complex="Wingdings"/>
    </style:style>
    <style:style style:family="text" style:name="T613">
      <style:text-properties fo:font-family="Symbol" style:font-family-asian="Symbol" style:font-family-complex="Symbol"/>
    </style:style>
    <style:style style:family="text" style:name="T614">
      <style:text-properties fo:font-family="Courier New" style:font-family-asian="Courier New" style:font-family-complex="Courier New"/>
    </style:style>
    <style:style style:family="text" style:name="T615">
      <style:text-properties fo:font-family="Wingdings" style:font-family-asian="Wingdings" style:font-family-complex="Wingdings"/>
    </style:style>
    <style:style style:family="text" style:name="T616">
      <style:text-properties fo:font-family="Symbol" style:font-family-asian="Symbol" style:font-family-complex="Symbol"/>
    </style:style>
    <style:style style:family="text" style:name="T617">
      <style:text-properties fo:font-family="Courier New" style:font-family-asian="Courier New" style:font-family-complex="Courier New"/>
    </style:style>
    <style:style style:family="text" style:name="T618">
      <style:text-properties fo:font-family="Wingdings" style:font-family-asian="Wingdings" style:font-family-complex="Wingdings"/>
    </style:style>
    <style:style style:family="text" style:name="T619">
      <style:text-properties fo:font-family="Symbol" style:font-family-asian="Symbol" style:font-family-complex="Symbol"/>
    </style:style>
    <style:style style:family="text" style:name="T620">
      <style:text-properties fo:font-family="Courier New" style:font-family-asian="Courier New" style:font-family-complex="Courier New"/>
    </style:style>
    <style:style style:family="text" style:name="T621">
      <style:text-properties fo:font-family="Wingdings" style:font-family-asian="Wingdings" style:font-family-complex="Wingdings"/>
    </style:style>
    <style:style style:family="text" style:name="T622">
      <style:text-properties fo:font-family="Symbol" style:font-family-asian="Symbol" style:font-family-complex="Symbol"/>
    </style:style>
    <style:style style:family="text" style:name="T623">
      <style:text-properties fo:font-family="Courier New" style:font-family-asian="Courier New" style:font-family-complex="Courier New"/>
    </style:style>
    <style:style style:family="text" style:name="T624">
      <style:text-properties fo:font-family="Wingdings" style:font-family-asian="Wingdings" style:font-family-complex="Wingdings"/>
    </style:style>
    <style:style style:family="text" style:name="T625">
      <style:text-properties fo:font-family="Symbol" style:font-family-asian="Symbol" style:font-family-complex="Symbol"/>
    </style:style>
    <style:style style:family="text" style:name="T626">
      <style:text-properties fo:font-family="Courier New" style:font-family-asian="Courier New" style:font-family-complex="Courier New"/>
    </style:style>
    <style:style style:family="text" style:name="T627">
      <style:text-properties fo:font-family="Wingdings" style:font-family-asian="Wingdings" style:font-family-complex="Wingdings"/>
    </style:style>
    <style:style style:family="text" style:name="T628">
      <style:text-properties fo:font-family="Symbol" style:font-family-asian="Symbol" style:font-family-complex="Symbol"/>
    </style:style>
    <style:style style:family="text" style:name="T629">
      <style:text-properties fo:font-family="Courier New" style:font-family-asian="Courier New" style:font-family-complex="Courier New"/>
    </style:style>
    <style:style style:family="text" style:name="T630">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2">
      <text:list-level-style-bullet text:level="1" text:style-name="T10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3">
      <text:list-level-style-bullet text:level="1" text:style-name="T10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4">
      <text:list-level-style-bullet text:level="1" text:style-name="T11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0">
      <text:list-level-style-bullet text:level="1" text:style-name="T17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2">
      <text:list-level-style-bullet text:level="1" text:style-name="T19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4">
      <text:list-level-style-bullet text:level="1" text:style-name="T20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6">
      <text:list-level-style-bullet text:level="1" text:style-name="T22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8">
      <text:list-level-style-bullet text:level="1" text:style-name="T24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4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4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4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4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5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5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9">
      <text:list-level-style-bullet text:level="1" text:style-name="T25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5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5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0">
      <text:list-level-style-bullet text:level="1" text:style-name="T26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6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6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6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6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6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6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1">
      <text:list-level-style-bullet text:level="1" text:style-name="T27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7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7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7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2">
      <text:list-level-style-bullet text:level="1" text:style-name="T28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8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8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8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8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8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8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8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8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3">
      <text:list-level-style-bullet text:level="1" text:style-name="T28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9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9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9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9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9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9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9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4">
      <text:list-level-style-bullet text:level="1" text:style-name="T29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0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0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0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0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0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0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5">
      <text:list-level-style-bullet text:level="1" text:style-name="T30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0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1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1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6">
      <text:list-level-style-bullet text:level="1" text:style-name="T31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1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1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2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2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2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2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7">
      <text:list-level-style-bullet text:level="1" text:style-name="T32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2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2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2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3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3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3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8">
      <text:list-level-style-bullet text:level="1" text:style-name="T33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3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3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3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3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4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4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9">
      <text:list-level-style-bullet text:level="1" text:style-name="T34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4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4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4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4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4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5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0">
      <text:list-level-style-bullet text:level="1" text:style-name="T35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5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5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5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5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5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5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1">
      <text:list-level-style-bullet text:level="1" text:style-name="T36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6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6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6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6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6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6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6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2">
      <text:list-level-style-bullet text:level="1" text:style-name="T37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7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7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7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7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7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7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7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7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3">
      <text:list-level-style-bullet text:level="1" text:style-name="T37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8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8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8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8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8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8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8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4">
      <text:list-level-style-bullet text:level="1" text:style-name="T38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9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9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9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9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9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9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9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0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0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0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0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0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6">
      <text:list-level-style-bullet text:level="1" text:style-name="T40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0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0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1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1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1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1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1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1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1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2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2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2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2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2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2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2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3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3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3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3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3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3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3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4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0">
      <text:list-level-style-bullet text:level="1" text:style-name="T44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4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4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4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4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4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4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1">
      <text:list-level-style-bullet text:level="1" text:style-name="T45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5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5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5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5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5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5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5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2">
      <text:list-level-style-bullet text:level="1" text:style-name="T46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6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6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6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6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6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6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6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6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3">
      <text:list-level-style-bullet text:level="1" text:style-name="T46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7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7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7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7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7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7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7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4">
      <text:list-level-style-bullet text:level="1" text:style-name="T47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8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8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8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8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8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8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5">
      <text:list-level-style-bullet text:level="1" text:style-name="T48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8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9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9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9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9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9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6">
      <text:list-level-style-bullet text:level="1" text:style-name="T49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9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9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0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0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0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0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7">
      <text:list-level-style-bullet text:level="1" text:style-name="T50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0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0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0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1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1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1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8">
      <text:list-level-style-bullet text:level="1" text:style-name="T51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1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1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1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1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2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2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9">
      <text:list-level-style-bullet text:level="1" text:style-name="T52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2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2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2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2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2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3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0">
      <text:list-level-style-bullet text:level="1" text:style-name="T53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3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3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3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3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3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3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1">
      <text:list-level-style-bullet text:level="1" text:style-name="T54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4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4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4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4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4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4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4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2">
      <text:list-level-style-bullet text:level="1" text:style-name="T55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5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5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5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5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5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5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5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5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3">
      <text:list-level-style-bullet text:level="1" text:style-name="T55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6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6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6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6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6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6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6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4">
      <text:list-level-style-bullet text:level="1" text:style-name="T56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7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7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7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7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7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7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5">
      <text:list-level-style-bullet text:level="1" text:style-name="T57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7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8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8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8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8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8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6">
      <text:list-level-style-bullet text:level="1" text:style-name="T58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8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8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9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9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9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9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7">
      <text:list-level-style-bullet text:level="1" text:style-name="T59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9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9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9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0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0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0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8">
      <text:list-level-style-bullet text:level="1" text:style-name="T60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0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0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0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0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1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1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9">
      <text:list-level-style-bullet text:level="1" text:style-name="T61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1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1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1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1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1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2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0">
      <text:list-level-style-bullet text:level="1" text:style-name="T62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2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2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2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2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2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2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1.27cm" fo:margin-bottom="1.27cm" fo:margin-left="2.54cm" fo:margin-right="2.54cm"/>
    </style:page-layout>
    <style:page-layout style:name="Mpm2">
      <style:page-layout-properties fo:page-width="21.59cm" fo:page-height="27.94cm" style:print-orientation="portrait" fo:margin-top="1.27cm" fo:margin-bottom="1.27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4.0.129</meta:generator>
    <dc:creator/>
  </office:meta>
</office:document-meta>
</file>