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paragraph-properties fo:line-height="115%" fo:margin-left="0cm" fo:margin-right="0cm" fo:text-indent="0cm" fo:margin-top="0pt" fo:margin-bottom="0pt" fo:border="none"/>
      <style:text-properties/>
    </style:style>
    <style:style style:family="text" style:name="T482">
      <style:text-properties fo:color="#1f1f1f" fo:font-family="Arial" style:font-family-asian="Arial" style:font-family-complex="Arial" fo:font-size="12pt"/>
    </style:style>
    <style:style style:parent-style-name="141" style:family="paragraph" style:name="P3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483">
      <style:text-properties fo:color="#1f1f1f" fo:font-family="Arial" style:font-family-asian="Arial" style:font-family-complex="Arial" fo:font-size="14pt" fo:font-weight="bold"/>
    </style:style>
    <style:style style:family="paragraph" style:name="P35">
      <style:paragraph-properties fo:line-height="115%" fo:margin-left="0cm" fo:margin-right="0cm" fo:text-indent="0cm" fo:margin-top="0pt" fo:margin-bottom="0pt" fo:border="none"/>
      <style:text-properties/>
    </style:style>
    <style:style style:family="text" style:name="T484">
      <style:text-properties fo:color="#1f1f1f" fo:font-family="Arial" style:font-family-asian="Arial" style:font-family-complex="Arial" fo:font-size="12pt"/>
    </style:style>
    <style:style style:parent-style-name="142" style:family="paragraph" style:name="P3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85">
      <style:text-properties fo:color="#1f1f1f" fo:font-family="Arial" style:font-family-asian="Arial" style:font-family-complex="Arial" fo:font-size="12pt" fo:font-weight="bold"/>
    </style:style>
    <style:style style:family="paragraph" style:name="P37">
      <style:paragraph-properties fo:line-height="115%" fo:margin-left="0cm" fo:margin-right="0cm" fo:text-indent="0cm" fo:margin-top="0pt" fo:margin-bottom="0pt" fo:border="none"/>
      <style:text-properties/>
    </style:style>
    <style:style style:family="text" style:name="T486">
      <style:text-properties fo:color="#1f1f1f" fo:font-family="Arial" style:font-family-asian="Arial" style:font-family-complex="Arial" fo:font-size="12pt"/>
    </style:style>
    <style:style style:parent-style-name="142" style:family="paragraph" style:name="P3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87">
      <style:text-properties fo:color="#1f1f1f" fo:font-family="Arial" style:font-family-asian="Arial" style:font-family-complex="Arial" fo:font-size="12pt" fo:font-weight="bold"/>
    </style:style>
    <style:style style:family="paragraph" style:name="P39">
      <style:paragraph-properties fo:line-height="115%" fo:margin-left="0cm" fo:margin-right="0cm" fo:text-indent="0cm" fo:margin-top="0pt" fo:margin-bottom="0pt" fo:border="none"/>
      <style:text-properties/>
    </style:style>
    <style:style style:family="text" style:name="T488">
      <style:text-properties fo:color="#1f1f1f" fo:font-family="Arial" style:font-family-asian="Arial" style:font-family-complex="Arial" fo:font-size="12pt"/>
    </style:style>
    <style:style style:parent-style-name="142" style:family="paragraph" style:name="P4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89">
      <style:text-properties fo:color="#1f1f1f" fo:font-family="Arial" style:font-family-asian="Arial" style:font-family-complex="Arial" fo:font-size="12pt" fo:font-weight="bold"/>
    </style:style>
    <style:style style:family="paragraph" style:name="P41">
      <style:paragraph-properties fo:line-height="115%" fo:margin-left="0cm" fo:margin-right="0cm" fo:text-indent="0cm" fo:margin-top="0pt" fo:margin-bottom="0pt" fo:border="none"/>
      <style:text-properties/>
    </style:style>
    <style:style style:family="text" style:name="T490">
      <style:text-properties fo:color="#1f1f1f" fo:font-family="Arial" style:font-family-asian="Arial" style:font-family-complex="Arial" fo:font-size="12pt"/>
    </style:style>
    <style:style style:parent-style-name="142" style:family="paragraph" style:name="P4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491">
      <style:text-properties fo:color="#1f1f1f" fo:font-family="Arial" style:font-family-asian="Arial" style:font-family-complex="Arial" fo:font-size="12pt" fo:font-weight="bold"/>
    </style:style>
    <style:style style:family="paragraph" style:name="P43">
      <style:paragraph-properties fo:line-height="115%" fo:margin-left="0cm" fo:margin-right="0cm" fo:text-indent="0cm" fo:margin-top="0pt" fo:margin-bottom="0pt" fo:border="none"/>
      <style:text-properties/>
    </style:style>
    <style:style style:family="text" style:name="T492">
      <style:text-properties fo:color="#1f1f1f" fo:font-family="Arial" style:font-family-asian="Arial" style:font-family-complex="Arial" fo:font-size="12pt"/>
    </style:style>
    <style:style style:parent-style-name="141" style:family="paragraph" style:name="P4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493">
      <style:text-properties fo:color="#1f1f1f" fo:font-family="Arial" style:font-family-asian="Arial" style:font-family-complex="Arial" fo:font-size="14pt" fo:font-weight="bold"/>
    </style:style>
    <style:style style:parent-style-name="668" style:list-style-name="WWNum1" style:family="paragraph" style:name="P45">
      <style:paragraph-properties fo:line-height="115%" fo:margin-right="0cm" fo:margin-top="0pt" fo:margin-bottom="0pt" fo:border="none"/>
      <style:text-properties/>
    </style:style>
    <style:style style:family="text" style:name="T494">
      <style:text-properties fo:color="#1f1f1f" fo:font-family="Arial" style:font-family-asian="Arial" style:font-family-complex="Arial" fo:font-size="12pt"/>
    </style:style>
    <style:style style:parent-style-name="668" style:list-style-name="WWNum1" style:family="paragraph" style:name="P46">
      <style:paragraph-properties fo:line-height="115%" fo:margin-right="0cm" fo:margin-top="0pt" fo:margin-bottom="0pt" fo:border="none"/>
      <style:text-properties/>
    </style:style>
    <style:style style:family="text" style:name="T495">
      <style:text-properties fo:color="#1f1f1f" fo:font-family="Arial" style:font-family-asian="Arial" style:font-family-complex="Arial" fo:font-size="12pt"/>
    </style:style>
    <style:style style:parent-style-name="668" style:list-style-name="WWNum1" style:family="paragraph" style:name="P47">
      <style:paragraph-properties fo:line-height="115%" fo:margin-right="0cm" fo:margin-top="0pt" fo:margin-bottom="0pt" fo:border="none"/>
      <style:text-properties/>
    </style:style>
    <style:style style:family="text" style:name="T496">
      <style:text-properties fo:color="#1f1f1f" fo:font-family="Arial" style:font-family-asian="Arial" style:font-family-complex="Arial" fo:font-size="12pt"/>
    </style:style>
    <style:style style:parent-style-name="668" style:list-style-name="WWNum1" style:family="paragraph" style:name="P48">
      <style:paragraph-properties fo:line-height="115%" fo:margin-right="0cm" fo:margin-top="0pt" fo:margin-bottom="0pt" fo:border="none"/>
      <style:text-properties/>
    </style:style>
    <style:style style:family="text" style:name="T497">
      <style:text-properties fo:color="#1f1f1f" fo:font-family="Arial" style:font-family-asian="Arial" style:font-family-complex="Arial" fo:font-size="12pt"/>
    </style:style>
    <style:style style:family="paragraph" style:name="P49">
      <style:paragraph-properties/>
      <style:text-properties/>
    </style:style>
    <style:style style:family="paragraph" style:name="P50">
      <style:paragraph-properties fo:line-height="115%" fo:margin-left="0cm" fo:margin-right="0cm" fo:text-indent="0cm" fo:margin-top="0pt" fo:margin-bottom="0pt" fo:break-before="page" fo:border="none"/>
      <style:text-properties/>
    </style:style>
    <style:style style:family="text" style:name="T498">
      <style:text-properties fo:color="#1f1f1f" fo:font-family="Arial" style:font-family-asian="Arial" style:font-family-complex="Arial" fo:font-size="12pt"/>
    </style:style>
    <style:style style:parent-style-name="141" style:family="paragraph" style:name="P5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499">
      <style:text-properties fo:color="#1f1f1f" fo:font-family="Arial" style:font-family-asian="Arial" style:font-family-complex="Arial" fo:font-size="14pt" fo:font-weight="bold"/>
    </style:style>
    <style:style style:family="paragraph" style:name="P52">
      <style:paragraph-properties fo:line-height="115%" fo:margin-left="0cm" fo:margin-right="0cm" fo:text-indent="0cm" fo:margin-top="0pt" fo:margin-bottom="0pt" fo:border="none"/>
      <style:text-properties/>
    </style:style>
    <style:style style:family="text" style:name="T500">
      <style:text-properties fo:color="#1f1f1f" fo:font-family="Arial" style:font-family-asian="Arial" style:font-family-complex="Arial" fo:font-size="12pt"/>
    </style:style>
    <style:style style:parent-style-name="142" style:family="paragraph" style:name="P5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01">
      <style:text-properties fo:color="#1f1f1f" fo:font-family="Arial" style:font-family-asian="Arial" style:font-family-complex="Arial" fo:font-size="12pt" fo:font-weight="bold"/>
    </style:style>
    <style:style style:family="paragraph" style:name="P54">
      <style:paragraph-properties fo:line-height="115%" fo:margin-left="0cm" fo:margin-right="0cm" fo:text-indent="0cm" fo:margin-top="0pt" fo:margin-bottom="0pt" fo:border="none"/>
      <style:text-properties/>
    </style:style>
    <style:style style:family="text" style:name="T502">
      <style:text-properties fo:color="#1f1f1f" fo:font-family="Arial" style:font-family-asian="Arial" style:font-family-complex="Arial" fo:font-size="12pt"/>
    </style:style>
    <style:style style:family="text" style:name="T503">
      <style:text-properties fo:color="#1f1f1f" fo:font-family="Arial" style:font-family-asian="Arial" style:font-family-complex="Arial" fo:font-size="12pt"/>
    </style:style>
    <style:style style:parent-style-name="142" style:family="paragraph" style:name="P5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04">
      <style:text-properties fo:color="#1f1f1f" fo:font-family="Arial" style:font-family-asian="Arial" style:font-family-complex="Arial" fo:font-size="12pt" fo:font-weight="bold"/>
    </style:style>
    <style:style style:family="paragraph" style:name="P56">
      <style:paragraph-properties fo:line-height="115%" fo:margin-left="0cm" fo:margin-right="0cm" fo:text-indent="0cm" fo:margin-top="0pt" fo:margin-bottom="0pt" fo:border="none"/>
      <style:text-properties/>
    </style:style>
    <style:style style:family="text" style:name="T505">
      <style:text-properties fo:color="#1f1f1f" fo:font-family="Arial" style:font-family-asian="Arial" style:font-family-complex="Arial" fo:font-size="12pt"/>
    </style:style>
    <style:style style:family="text" style:name="T506">
      <style:text-properties fo:color="#1f1f1f" fo:font-family="Arial" style:font-family-asian="Arial" style:font-family-complex="Arial" fo:font-size="12pt"/>
    </style:style>
    <style:style style:parent-style-name="142" style:family="paragraph" style:name="P5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07">
      <style:text-properties fo:color="#1f1f1f" fo:font-family="Arial" style:font-family-asian="Arial" style:font-family-complex="Arial" fo:font-size="12pt" fo:font-weight="bold"/>
    </style:style>
    <style:style style:family="paragraph" style:name="P58">
      <style:paragraph-properties fo:line-height="115%" fo:margin-left="0cm" fo:margin-right="0cm" fo:text-indent="0cm" fo:margin-top="0pt" fo:margin-bottom="0pt" fo:border="none"/>
      <style:text-properties/>
    </style:style>
    <style:style style:family="text" style:name="T508">
      <style:text-properties fo:color="#1f1f1f" fo:font-family="Arial" style:font-family-asian="Arial" style:font-family-complex="Arial" fo:font-size="12pt"/>
    </style:style>
    <style:style style:family="text" style:name="T509">
      <style:text-properties fo:color="#1f1f1f" fo:font-family="Arial" style:font-family-asian="Arial" style:font-family-complex="Arial" fo:font-size="12pt"/>
    </style:style>
    <style:style style:parent-style-name="142" style:family="paragraph" style:name="P5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10">
      <style:text-properties fo:color="#1f1f1f" fo:font-family="Arial" style:font-family-asian="Arial" style:font-family-complex="Arial" fo:font-size="12pt" fo:font-weight="bold"/>
    </style:style>
    <style:style style:family="paragraph" style:name="P60">
      <style:paragraph-properties fo:line-height="115%" fo:margin-left="0cm" fo:margin-right="0cm" fo:text-indent="0cm" fo:margin-top="0pt" fo:margin-bottom="0pt" fo:border="none"/>
      <style:text-properties/>
    </style:style>
    <style:style style:family="text" style:name="T511">
      <style:text-properties fo:color="#1f1f1f" fo:font-family="Arial" style:font-family-asian="Arial" style:font-family-complex="Arial" fo:font-size="12pt"/>
    </style:style>
    <style:style style:family="text" style:name="T512">
      <style:text-properties fo:color="#1f1f1f" fo:font-family="Arial" style:font-family-asian="Arial" style:font-family-complex="Arial" fo:font-size="12pt"/>
    </style:style>
    <style:style style:parent-style-name="141" style:family="paragraph" style:name="P6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13">
      <style:text-properties fo:color="#1f1f1f" fo:font-family="Arial" style:font-family-asian="Arial" style:font-family-complex="Arial" fo:font-size="14pt" fo:font-weight="bold"/>
    </style:style>
    <style:style style:parent-style-name="668" style:list-style-name="WWNum2" style:family="paragraph" style:name="P62">
      <style:paragraph-properties fo:line-height="115%" fo:margin-right="0cm" fo:margin-top="0pt" fo:margin-bottom="0pt" fo:border="none"/>
      <style:text-properties/>
    </style:style>
    <style:style style:family="text" style:name="T514">
      <style:text-properties fo:color="#1f1f1f" fo:font-family="Arial" style:font-family-asian="Arial" style:font-family-complex="Arial" fo:font-size="12pt"/>
    </style:style>
    <style:style style:parent-style-name="668" style:list-style-name="WWNum2" style:family="paragraph" style:name="P63">
      <style:paragraph-properties fo:line-height="115%" fo:margin-right="0cm" fo:margin-top="0pt" fo:margin-bottom="0pt" fo:border="none"/>
      <style:text-properties/>
    </style:style>
    <style:style style:family="text" style:name="T515">
      <style:text-properties fo:color="#1f1f1f" fo:font-family="Arial" style:font-family-asian="Arial" style:font-family-complex="Arial" fo:font-size="12pt"/>
    </style:style>
    <style:style style:parent-style-name="668" style:list-style-name="WWNum2" style:family="paragraph" style:name="P64">
      <style:paragraph-properties fo:line-height="115%" fo:margin-right="0cm" fo:margin-top="0pt" fo:margin-bottom="0pt" fo:border="none"/>
      <style:text-properties/>
    </style:style>
    <style:style style:family="text" style:name="T516">
      <style:text-properties fo:color="#1f1f1f" fo:font-family="Arial" style:font-family-asian="Arial" style:font-family-complex="Arial" fo:font-size="12pt"/>
    </style:style>
    <style:style style:parent-style-name="668" style:list-style-name="WWNum2" style:family="paragraph" style:name="P65">
      <style:paragraph-properties fo:line-height="115%" fo:margin-right="0cm" fo:margin-top="0pt" fo:margin-bottom="0pt" fo:border="none"/>
      <style:text-properties/>
    </style:style>
    <style:style style:family="text" style:name="T517">
      <style:text-properties fo:color="#1f1f1f" fo:font-family="Arial" style:font-family-asian="Arial" style:font-family-complex="Arial" fo:font-size="12pt"/>
    </style:style>
    <style:style style:family="paragraph" style:name="P66">
      <style:paragraph-properties/>
      <style:text-properties/>
    </style:style>
    <style:style style:family="paragraph" style:name="P67">
      <style:paragraph-properties fo:line-height="115%" fo:margin-left="0cm" fo:margin-right="0cm" fo:text-indent="0cm" fo:margin-top="0pt" fo:margin-bottom="0pt" fo:break-before="page" fo:border="none"/>
      <style:text-properties/>
    </style:style>
    <style:style style:family="text" style:name="T518">
      <style:text-properties fo:color="#1f1f1f" fo:font-family="Arial" style:font-family-asian="Arial" style:font-family-complex="Arial" fo:font-size="12pt"/>
    </style:style>
    <style:style style:parent-style-name="141" style:family="paragraph" style:name="P6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19">
      <style:text-properties fo:color="#1f1f1f" fo:font-family="Arial" style:font-family-asian="Arial" style:font-family-complex="Arial" fo:font-size="14pt" fo:font-weight="bold"/>
    </style:style>
    <style:style style:family="paragraph" style:name="P69">
      <style:paragraph-properties fo:line-height="115%" fo:margin-left="0cm" fo:margin-right="0cm" fo:text-indent="0cm" fo:margin-top="0pt" fo:margin-bottom="0pt" fo:border="none"/>
      <style:text-properties/>
    </style:style>
    <style:style style:family="text" style:name="T520">
      <style:text-properties fo:color="#1f1f1f" fo:font-family="Arial" style:font-family-asian="Arial" style:font-family-complex="Arial" fo:font-size="12pt"/>
    </style:style>
    <style:style style:family="paragraph" style:name="P70">
      <style:paragraph-properties fo:line-height="115%" fo:margin-left="0cm" fo:margin-right="0cm" fo:text-indent="0cm" fo:margin-top="0pt" fo:margin-bottom="0pt" fo:border="none"/>
      <style:text-properties/>
    </style:style>
    <style:style style:family="text" style:name="T521">
      <style:text-properties fo:color="#1f1f1f" fo:font-family="Arial" style:font-family-asian="Arial" style:font-family-complex="Arial" fo:font-size="12pt"/>
    </style:style>
    <style:style style:family="paragraph" style:name="P71">
      <style:paragraph-properties fo:line-height="115%" fo:margin-left="0cm" fo:margin-right="0cm" fo:text-indent="0cm" fo:margin-top="0pt" fo:margin-bottom="0pt" fo:border="none"/>
      <style:text-properties/>
    </style:style>
    <style:style style:family="text" style:name="T522">
      <style:text-properties fo:color="#1f1f1f" fo:font-family="Arial" style:font-family-asian="Arial" style:font-family-complex="Arial" fo:font-size="12pt"/>
    </style:style>
    <style:style style:family="text" style:name="T523">
      <style:text-properties fo:color="#1f1f1f" fo:font-family="Arial" style:font-family-asian="Arial" style:font-family-complex="Arial" fo:font-size="12pt"/>
    </style:style>
    <style:style style:family="paragraph" style:name="P72">
      <style:paragraph-properties fo:line-height="115%" fo:margin-left="0cm" fo:margin-right="0cm" fo:text-indent="0cm" fo:margin-top="0pt" fo:margin-bottom="0pt" fo:border="none"/>
      <style:text-properties/>
    </style:style>
    <style:style style:family="text" style:name="T524">
      <style:text-properties fo:color="#1f1f1f" fo:font-family="Arial" style:font-family-asian="Arial" style:font-family-complex="Arial" fo:font-size="12pt"/>
    </style:style>
    <style:style style:family="text" style:name="T525">
      <style:text-properties fo:color="#1f1f1f" fo:font-family="Arial" style:font-family-asian="Arial" style:font-family-complex="Arial" fo:font-size="12pt"/>
    </style:style>
    <style:style style:family="paragraph" style:name="P73">
      <style:paragraph-properties fo:line-height="115%" fo:margin-left="0cm" fo:margin-right="0cm" fo:text-indent="0cm" fo:margin-top="0pt" fo:margin-bottom="0pt" fo:border="none"/>
      <style:text-properties/>
    </style:style>
    <style:style style:family="text" style:name="T526">
      <style:text-properties fo:color="#1f1f1f" fo:font-family="Arial" style:font-family-asian="Arial" style:font-family-complex="Arial" fo:font-size="12pt"/>
    </style:style>
    <style:style style:family="text" style:name="T527">
      <style:text-properties fo:color="#1f1f1f" fo:font-family="Arial" style:font-family-asian="Arial" style:font-family-complex="Arial" fo:font-size="12pt"/>
    </style:style>
    <style:style style:parent-style-name="141" style:family="paragraph" style:name="P7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28">
      <style:text-properties fo:color="#1f1f1f" fo:font-family="Arial" style:font-family-asian="Arial" style:font-family-complex="Arial" fo:font-size="14pt" fo:font-weight="bold"/>
    </style:style>
    <style:style style:parent-style-name="668" style:list-style-name="WWNum3" style:family="paragraph" style:name="P75">
      <style:paragraph-properties fo:line-height="115%" fo:margin-right="0cm" fo:margin-top="0pt" fo:margin-bottom="0pt" fo:border="none"/>
      <style:text-properties/>
    </style:style>
    <style:style style:family="text" style:name="T529">
      <style:text-properties fo:color="#1f1f1f" fo:font-family="Arial" style:font-family-asian="Arial" style:font-family-complex="Arial" fo:font-size="12pt"/>
    </style:style>
    <style:style style:parent-style-name="668" style:list-style-name="WWNum3" style:family="paragraph" style:name="P76">
      <style:paragraph-properties fo:line-height="115%" fo:margin-right="0cm" fo:margin-top="0pt" fo:margin-bottom="0pt" fo:border="none"/>
      <style:text-properties/>
    </style:style>
    <style:style style:family="text" style:name="T530">
      <style:text-properties fo:color="#1f1f1f" fo:font-family="Arial" style:font-family-asian="Arial" style:font-family-complex="Arial" fo:font-size="12pt"/>
    </style:style>
    <style:style style:parent-style-name="668" style:list-style-name="WWNum3" style:family="paragraph" style:name="P77">
      <style:paragraph-properties fo:line-height="115%" fo:margin-right="0cm" fo:margin-top="0pt" fo:margin-bottom="0pt" fo:border="none"/>
      <style:text-properties/>
    </style:style>
    <style:style style:family="text" style:name="T531">
      <style:text-properties fo:color="#1f1f1f" fo:font-family="Arial" style:font-family-asian="Arial" style:font-family-complex="Arial" fo:font-size="12pt"/>
    </style:style>
    <style:style style:parent-style-name="668" style:list-style-name="WWNum3" style:family="paragraph" style:name="P78">
      <style:paragraph-properties fo:line-height="115%" fo:margin-right="0cm" fo:margin-top="0pt" fo:margin-bottom="0pt" fo:border="none"/>
      <style:text-properties/>
    </style:style>
    <style:style style:family="text" style:name="T532">
      <style:text-properties fo:color="#1f1f1f" fo:font-family="Arial" style:font-family-asian="Arial" style:font-family-complex="Arial" fo:font-size="12pt"/>
    </style:style>
    <style:style style:family="paragraph" style:name="P79">
      <style:paragraph-properties/>
      <style:text-properties/>
    </style:style>
    <style:style style:parent-style-name="141" style:family="paragraph" style:name="P80">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533">
      <style:text-properties fo:color="#1f1f1f" fo:font-family="Arial" style:font-family-asian="Arial" style:font-family-complex="Arial" fo:font-size="14pt" fo:font-weight="bold"/>
    </style:style>
    <style:style style:family="paragraph" style:name="P81">
      <style:paragraph-properties fo:line-height="115%" fo:margin-left="0cm" fo:margin-right="0cm" fo:text-indent="0cm" fo:margin-top="0pt" fo:margin-bottom="0pt" fo:border="none"/>
      <style:text-properties/>
    </style:style>
    <style:style style:family="text" style:name="T534">
      <style:text-properties fo:color="#1f1f1f" fo:font-family="Arial" style:font-family-asian="Arial" style:font-family-complex="Arial" fo:font-size="12pt"/>
    </style:style>
    <style:style style:parent-style-name="142" style:family="paragraph" style:name="P8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35">
      <style:text-properties fo:color="#1f1f1f" fo:font-family="Arial" style:font-family-asian="Arial" style:font-family-complex="Arial" fo:font-size="12pt" fo:font-weight="bold"/>
    </style:style>
    <style:style style:family="paragraph" style:name="P83">
      <style:paragraph-properties fo:line-height="115%" fo:margin-left="0cm" fo:margin-right="0cm" fo:text-indent="0cm" fo:margin-top="0pt" fo:margin-bottom="0pt" fo:border="none"/>
      <style:text-properties/>
    </style:style>
    <style:style style:family="text" style:name="T536">
      <style:text-properties fo:color="#1f1f1f" fo:font-family="Arial" style:font-family-asian="Arial" style:font-family-complex="Arial" fo:font-size="12pt"/>
    </style:style>
    <style:style style:parent-style-name="142" style:family="paragraph" style:name="P8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37">
      <style:text-properties fo:color="#1f1f1f" fo:font-family="Arial" style:font-family-asian="Arial" style:font-family-complex="Arial" fo:font-size="12pt" fo:font-weight="bold"/>
    </style:style>
    <style:style style:family="paragraph" style:name="P85">
      <style:paragraph-properties fo:line-height="115%" fo:margin-left="0cm" fo:margin-right="0cm" fo:text-indent="0cm" fo:margin-top="0pt" fo:margin-bottom="0pt" fo:border="none"/>
      <style:text-properties/>
    </style:style>
    <style:style style:family="text" style:name="T538">
      <style:text-properties fo:color="#1f1f1f" fo:font-family="Arial" style:font-family-asian="Arial" style:font-family-complex="Arial" fo:font-size="12pt"/>
    </style:style>
    <style:style style:parent-style-name="142" style:family="paragraph" style:name="P8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39">
      <style:text-properties fo:color="#1f1f1f" fo:font-family="Arial" style:font-family-asian="Arial" style:font-family-complex="Arial" fo:font-size="12pt" fo:font-weight="bold"/>
    </style:style>
    <style:style style:family="paragraph" style:name="P87">
      <style:paragraph-properties fo:line-height="115%" fo:margin-left="0cm" fo:margin-right="0cm" fo:text-indent="0cm" fo:margin-top="0pt" fo:margin-bottom="0pt" fo:border="none"/>
      <style:text-properties/>
    </style:style>
    <style:style style:family="text" style:name="T540">
      <style:text-properties fo:color="#1f1f1f" fo:font-family="Arial" style:font-family-asian="Arial" style:font-family-complex="Arial" fo:font-size="12pt"/>
    </style:style>
    <style:style style:parent-style-name="142" style:family="paragraph" style:name="P8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41">
      <style:text-properties fo:color="#1f1f1f" fo:font-family="Arial" style:font-family-asian="Arial" style:font-family-complex="Arial" fo:font-size="12pt" fo:font-weight="bold"/>
    </style:style>
    <style:style style:family="paragraph" style:name="P89">
      <style:paragraph-properties fo:line-height="115%" fo:margin-left="0cm" fo:margin-right="0cm" fo:text-indent="0cm" fo:margin-top="0pt" fo:margin-bottom="0pt" fo:border="none"/>
      <style:text-properties/>
    </style:style>
    <style:style style:family="text" style:name="T542">
      <style:text-properties fo:color="#1f1f1f" fo:font-family="Arial" style:font-family-asian="Arial" style:font-family-complex="Arial" fo:font-size="12pt"/>
    </style:style>
    <style:style style:parent-style-name="141" style:family="paragraph" style:name="P9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43">
      <style:text-properties fo:color="#1f1f1f" fo:font-family="Arial" style:font-family-asian="Arial" style:font-family-complex="Arial" fo:font-size="14pt" fo:font-weight="bold"/>
    </style:style>
    <style:style style:parent-style-name="668" style:list-style-name="WWNum4" style:family="paragraph" style:name="P91">
      <style:paragraph-properties fo:line-height="115%" fo:margin-right="0cm" fo:margin-top="0pt" fo:margin-bottom="0pt" fo:border="none"/>
      <style:text-properties/>
    </style:style>
    <style:style style:family="text" style:name="T544">
      <style:text-properties fo:color="#1f1f1f" fo:font-family="Arial" style:font-family-asian="Arial" style:font-family-complex="Arial" fo:font-size="12pt"/>
    </style:style>
    <style:style style:parent-style-name="668" style:list-style-name="WWNum4" style:family="paragraph" style:name="P92">
      <style:paragraph-properties fo:line-height="115%" fo:margin-right="0cm" fo:margin-top="0pt" fo:margin-bottom="0pt" fo:border="none"/>
      <style:text-properties/>
    </style:style>
    <style:style style:family="text" style:name="T545">
      <style:text-properties fo:color="#1f1f1f" fo:font-family="Arial" style:font-family-asian="Arial" style:font-family-complex="Arial" fo:font-size="12pt"/>
    </style:style>
    <style:style style:parent-style-name="668" style:list-style-name="WWNum4" style:family="paragraph" style:name="P93">
      <style:paragraph-properties fo:line-height="115%" fo:margin-right="0cm" fo:margin-top="0pt" fo:margin-bottom="0pt" fo:border="none"/>
      <style:text-properties/>
    </style:style>
    <style:style style:family="text" style:name="T546">
      <style:text-properties fo:color="#1f1f1f" fo:font-family="Arial" style:font-family-asian="Arial" style:font-family-complex="Arial" fo:font-size="12pt"/>
    </style:style>
    <style:style style:parent-style-name="668" style:list-style-name="WWNum4" style:family="paragraph" style:name="P94">
      <style:paragraph-properties fo:line-height="115%" fo:margin-right="0cm" fo:margin-top="0pt" fo:margin-bottom="0pt" fo:border="none"/>
      <style:text-properties/>
    </style:style>
    <style:style style:family="text" style:name="T547">
      <style:text-properties fo:color="#1f1f1f" fo:font-family="Arial" style:font-family-asian="Arial" style:font-family-complex="Arial" fo:font-size="12pt"/>
    </style:style>
    <style:style style:family="paragraph" style:name="P95">
      <style:paragraph-properties/>
      <style:text-properties/>
    </style:style>
    <style:style style:family="paragraph" style:name="P96">
      <style:paragraph-properties fo:line-height="115%" fo:margin-left="0cm" fo:margin-right="0cm" fo:text-indent="0cm" fo:margin-top="0pt" fo:margin-bottom="0pt" fo:break-before="page" fo:border="none"/>
      <style:text-properties/>
    </style:style>
    <style:style style:family="text" style:name="T548">
      <style:text-properties fo:color="#1f1f1f" fo:font-family="Arial" style:font-family-asian="Arial" style:font-family-complex="Arial" fo:font-size="12pt"/>
    </style:style>
    <style:style style:parent-style-name="141" style:family="paragraph" style:name="P9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49">
      <style:text-properties fo:color="#1f1f1f" fo:font-family="Arial" style:font-family-asian="Arial" style:font-family-complex="Arial" fo:font-size="14pt" fo:font-weight="bold"/>
    </style:style>
    <style:style style:family="paragraph" style:name="P98">
      <style:paragraph-properties fo:line-height="115%" fo:margin-left="0cm" fo:margin-right="0cm" fo:text-indent="0cm" fo:margin-top="0pt" fo:margin-bottom="0pt" fo:border="none"/>
      <style:text-properties/>
    </style:style>
    <style:style style:family="text" style:name="T550">
      <style:text-properties fo:color="#1f1f1f" fo:font-family="Arial" style:font-family-asian="Arial" style:font-family-complex="Arial" fo:font-size="12pt"/>
    </style:style>
    <style:style style:parent-style-name="142" style:family="paragraph" style:name="P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51">
      <style:text-properties fo:color="#1f1f1f" fo:font-family="Arial" style:font-family-asian="Arial" style:font-family-complex="Arial" fo:font-size="12pt" fo:font-weight="bold"/>
    </style:style>
    <style:style style:family="paragraph" style:name="P100">
      <style:paragraph-properties fo:line-height="115%" fo:margin-left="0cm" fo:margin-right="0cm" fo:text-indent="0cm" fo:margin-top="0pt" fo:margin-bottom="0pt" fo:border="none"/>
      <style:text-properties/>
    </style:style>
    <style:style style:family="text" style:name="T552">
      <style:text-properties fo:color="#1f1f1f" fo:font-family="Arial" style:font-family-asian="Arial" style:font-family-complex="Arial" fo:font-size="12pt"/>
    </style:style>
    <style:style style:parent-style-name="142" style:family="paragraph" style:name="P1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53">
      <style:text-properties fo:color="#1f1f1f" fo:font-family="Arial" style:font-family-asian="Arial" style:font-family-complex="Arial" fo:font-size="12pt" fo:font-weight="bold"/>
    </style:style>
    <style:style style:family="paragraph" style:name="P102">
      <style:paragraph-properties fo:line-height="115%" fo:margin-left="0cm" fo:margin-right="0cm" fo:text-indent="0cm" fo:margin-top="0pt" fo:margin-bottom="0pt" fo:border="none"/>
      <style:text-properties/>
    </style:style>
    <style:style style:family="text" style:name="T554">
      <style:text-properties fo:color="#1f1f1f" fo:font-family="Arial" style:font-family-asian="Arial" style:font-family-complex="Arial" fo:font-size="12pt"/>
    </style:style>
    <style:style style:parent-style-name="142" style:family="paragraph" style:name="P10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55">
      <style:text-properties fo:color="#1f1f1f" fo:font-family="Arial" style:font-family-asian="Arial" style:font-family-complex="Arial" fo:font-size="12pt" fo:font-weight="bold"/>
    </style:style>
    <style:style style:family="paragraph" style:name="P104">
      <style:paragraph-properties fo:line-height="115%" fo:margin-left="0cm" fo:margin-right="0cm" fo:text-indent="0cm" fo:margin-top="0pt" fo:margin-bottom="0pt" fo:border="none"/>
      <style:text-properties/>
    </style:style>
    <style:style style:family="text" style:name="T556">
      <style:text-properties fo:color="#1f1f1f" fo:font-family="Arial" style:font-family-asian="Arial" style:font-family-complex="Arial" fo:font-size="12pt"/>
    </style:style>
    <style:style style:parent-style-name="142" style:family="paragraph" style:name="P10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57">
      <style:text-properties fo:color="#1f1f1f" fo:font-family="Arial" style:font-family-asian="Arial" style:font-family-complex="Arial" fo:font-size="12pt" fo:font-weight="bold"/>
    </style:style>
    <style:style style:family="paragraph" style:name="P106">
      <style:paragraph-properties fo:line-height="115%" fo:margin-left="0cm" fo:margin-right="0cm" fo:text-indent="0cm" fo:margin-top="0pt" fo:margin-bottom="0pt" fo:border="none"/>
      <style:text-properties/>
    </style:style>
    <style:style style:family="text" style:name="T558">
      <style:text-properties fo:color="#1f1f1f" fo:font-family="Arial" style:font-family-asian="Arial" style:font-family-complex="Arial" fo:font-size="12pt"/>
    </style:style>
    <style:style style:family="text" style:name="T559">
      <style:text-properties fo:color="#1f1f1f" fo:font-family="Arial" style:font-family-asian="Arial" style:font-family-complex="Arial" fo:font-size="12pt"/>
    </style:style>
    <style:style style:parent-style-name="141" style:family="paragraph" style:name="P10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60">
      <style:text-properties fo:color="#1f1f1f" fo:font-family="Arial" style:font-family-asian="Arial" style:font-family-complex="Arial" fo:font-size="14pt" fo:font-weight="bold"/>
    </style:style>
    <style:style style:parent-style-name="668" style:list-style-name="WWNum5" style:family="paragraph" style:name="P108">
      <style:paragraph-properties fo:line-height="115%" fo:margin-right="0cm" fo:margin-top="0pt" fo:margin-bottom="0pt" fo:border="none"/>
      <style:text-properties/>
    </style:style>
    <style:style style:family="text" style:name="T561">
      <style:text-properties fo:color="#1f1f1f" fo:font-family="Arial" style:font-family-asian="Arial" style:font-family-complex="Arial" fo:font-size="12pt"/>
    </style:style>
    <style:style style:parent-style-name="668" style:list-style-name="WWNum5" style:family="paragraph" style:name="P109">
      <style:paragraph-properties fo:line-height="115%" fo:margin-right="0cm" fo:margin-top="0pt" fo:margin-bottom="0pt" fo:border="none"/>
      <style:text-properties/>
    </style:style>
    <style:style style:family="text" style:name="T562">
      <style:text-properties fo:color="#1f1f1f" fo:font-family="Arial" style:font-family-asian="Arial" style:font-family-complex="Arial" fo:font-size="12pt"/>
    </style:style>
    <style:style style:parent-style-name="668" style:list-style-name="WWNum5" style:family="paragraph" style:name="P110">
      <style:paragraph-properties fo:line-height="115%" fo:margin-right="0cm" fo:margin-top="0pt" fo:margin-bottom="0pt" fo:border="none"/>
      <style:text-properties/>
    </style:style>
    <style:style style:family="text" style:name="T563">
      <style:text-properties fo:color="#1f1f1f" fo:font-family="Arial" style:font-family-asian="Arial" style:font-family-complex="Arial" fo:font-size="12pt"/>
    </style:style>
    <style:style style:parent-style-name="668" style:list-style-name="WWNum5" style:family="paragraph" style:name="P111">
      <style:paragraph-properties fo:line-height="115%" fo:margin-right="0cm" fo:margin-top="0pt" fo:margin-bottom="0pt" fo:border="none"/>
      <style:text-properties/>
    </style:style>
    <style:style style:family="text" style:name="T564">
      <style:text-properties fo:color="#1f1f1f" fo:font-family="Arial" style:font-family-asian="Arial" style:font-family-complex="Arial" fo:font-size="12pt"/>
    </style:style>
    <style:style style:family="paragraph" style:name="P112">
      <style:paragraph-properties/>
      <style:text-properties/>
    </style:style>
    <style:style style:family="paragraph" style:name="P113">
      <style:paragraph-properties fo:line-height="115%" fo:margin-left="0cm" fo:margin-right="0cm" fo:text-indent="0cm" fo:margin-top="0pt" fo:margin-bottom="0pt" fo:break-before="page" fo:border="none"/>
      <style:text-properties/>
    </style:style>
    <style:style style:family="text" style:name="T565">
      <style:text-properties fo:color="#1f1f1f" fo:font-family="Arial" style:font-family-asian="Arial" style:font-family-complex="Arial" fo:font-size="12pt"/>
    </style:style>
    <style:style style:parent-style-name="141" style:family="paragraph" style:name="P11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66">
      <style:text-properties fo:color="#1f1f1f" fo:font-family="Arial" style:font-family-asian="Arial" style:font-family-complex="Arial" fo:font-size="14pt" fo:font-weight="bold"/>
    </style:style>
    <style:style style:family="paragraph" style:name="P115">
      <style:paragraph-properties fo:line-height="115%" fo:margin-left="0cm" fo:margin-right="0cm" fo:text-indent="0cm" fo:margin-top="0pt" fo:margin-bottom="0pt" fo:border="none"/>
      <style:text-properties/>
    </style:style>
    <style:style style:family="text" style:name="T567">
      <style:text-properties fo:color="#1f1f1f" fo:font-family="Arial" style:font-family-asian="Arial" style:font-family-complex="Arial" fo:font-size="12pt"/>
    </style:style>
    <style:style style:parent-style-name="142" style:family="paragraph" style:name="P11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68">
      <style:text-properties fo:color="#1f1f1f" fo:font-family="Arial" style:font-family-asian="Arial" style:font-family-complex="Arial" fo:font-size="12pt" fo:font-weight="bold"/>
    </style:style>
    <style:style style:family="paragraph" style:name="P117">
      <style:paragraph-properties fo:line-height="115%" fo:margin-left="0cm" fo:margin-right="0cm" fo:text-indent="0cm" fo:margin-top="0pt" fo:margin-bottom="0pt" fo:border="none"/>
      <style:text-properties/>
    </style:style>
    <style:style style:family="text" style:name="T569">
      <style:text-properties fo:color="#1f1f1f" fo:font-family="Arial" style:font-family-asian="Arial" style:font-family-complex="Arial" fo:font-size="12pt"/>
    </style:style>
    <style:style style:parent-style-name="142" style:family="paragraph" style:name="P11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70">
      <style:text-properties fo:color="#1f1f1f" fo:font-family="Arial" style:font-family-asian="Arial" style:font-family-complex="Arial" fo:font-size="12pt" fo:font-weight="bold"/>
    </style:style>
    <style:style style:family="paragraph" style:name="P119">
      <style:paragraph-properties fo:line-height="115%" fo:margin-left="0cm" fo:margin-right="0cm" fo:text-indent="0cm" fo:margin-top="0pt" fo:margin-bottom="0pt" fo:border="none"/>
      <style:text-properties/>
    </style:style>
    <style:style style:family="text" style:name="T571">
      <style:text-properties fo:color="#1f1f1f" fo:font-family="Arial" style:font-family-asian="Arial" style:font-family-complex="Arial" fo:font-size="12pt"/>
    </style:style>
    <style:style style:parent-style-name="142" style:family="paragraph" style:name="P12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72">
      <style:text-properties fo:color="#1f1f1f" fo:font-family="Arial" style:font-family-asian="Arial" style:font-family-complex="Arial" fo:font-size="12pt" fo:font-weight="bold"/>
    </style:style>
    <style:style style:family="paragraph" style:name="P121">
      <style:paragraph-properties fo:line-height="115%" fo:margin-left="0cm" fo:margin-right="0cm" fo:text-indent="0cm" fo:margin-top="0pt" fo:margin-bottom="0pt" fo:border="none"/>
      <style:text-properties/>
    </style:style>
    <style:style style:family="text" style:name="T573">
      <style:text-properties fo:color="#1f1f1f" fo:font-family="Arial" style:font-family-asian="Arial" style:font-family-complex="Arial" fo:font-size="12pt"/>
    </style:style>
    <style:style style:parent-style-name="142" style:family="paragraph" style:name="P12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74">
      <style:text-properties fo:color="#1f1f1f" fo:font-family="Arial" style:font-family-asian="Arial" style:font-family-complex="Arial" fo:font-size="12pt" fo:font-weight="bold"/>
    </style:style>
    <style:style style:family="paragraph" style:name="P123">
      <style:paragraph-properties fo:line-height="115%" fo:margin-left="0cm" fo:margin-right="0cm" fo:text-indent="0cm" fo:margin-top="0pt" fo:margin-bottom="0pt" fo:border="none"/>
      <style:text-properties/>
    </style:style>
    <style:style style:family="text" style:name="T575">
      <style:text-properties fo:color="#1f1f1f" fo:font-family="Arial" style:font-family-asian="Arial" style:font-family-complex="Arial" fo:font-size="12pt"/>
    </style:style>
    <style:style style:parent-style-name="141" style:family="paragraph" style:name="P12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76">
      <style:text-properties fo:color="#1f1f1f" fo:font-family="Arial" style:font-family-asian="Arial" style:font-family-complex="Arial" fo:font-size="14pt" fo:font-weight="bold"/>
    </style:style>
    <style:style style:parent-style-name="668" style:list-style-name="WWNum6" style:family="paragraph" style:name="P125">
      <style:paragraph-properties fo:line-height="115%" fo:margin-right="0cm" fo:margin-top="0pt" fo:margin-bottom="0pt" fo:border="none"/>
      <style:text-properties/>
    </style:style>
    <style:style style:family="text" style:name="T577">
      <style:text-properties fo:color="#1f1f1f" fo:font-family="Arial" style:font-family-asian="Arial" style:font-family-complex="Arial" fo:font-size="12pt"/>
    </style:style>
    <style:style style:parent-style-name="668" style:list-style-name="WWNum6" style:family="paragraph" style:name="P126">
      <style:paragraph-properties fo:line-height="115%" fo:margin-right="0cm" fo:margin-top="0pt" fo:margin-bottom="0pt" fo:border="none"/>
      <style:text-properties/>
    </style:style>
    <style:style style:family="text" style:name="T578">
      <style:text-properties fo:color="#1f1f1f" fo:font-family="Arial" style:font-family-asian="Arial" style:font-family-complex="Arial" fo:font-size="12pt"/>
    </style:style>
    <style:style style:parent-style-name="668" style:list-style-name="WWNum6" style:family="paragraph" style:name="P127">
      <style:paragraph-properties fo:line-height="115%" fo:margin-right="0cm" fo:margin-top="0pt" fo:margin-bottom="0pt" fo:border="none"/>
      <style:text-properties/>
    </style:style>
    <style:style style:family="text" style:name="T579">
      <style:text-properties fo:color="#1f1f1f" fo:font-family="Arial" style:font-family-asian="Arial" style:font-family-complex="Arial" fo:font-size="12pt"/>
    </style:style>
    <style:style style:parent-style-name="668" style:list-style-name="WWNum6" style:family="paragraph" style:name="P128">
      <style:paragraph-properties fo:line-height="115%" fo:margin-right="0cm" fo:margin-top="0pt" fo:margin-bottom="0pt" fo:border="none"/>
      <style:text-properties/>
    </style:style>
    <style:style style:family="text" style:name="T580">
      <style:text-properties fo:color="#1f1f1f" fo:font-family="Arial" style:font-family-asian="Arial" style:font-family-complex="Arial" fo:font-size="12pt"/>
    </style:style>
    <style:style style:family="paragraph" style:name="P129">
      <style:paragraph-properties/>
      <style:text-properties/>
    </style:style>
    <style:style style:family="paragraph" style:name="P130">
      <style:paragraph-properties fo:line-height="115%" fo:margin-left="0cm" fo:margin-right="0cm" fo:text-indent="0cm" fo:margin-top="0pt" fo:margin-bottom="0pt" fo:break-before="page" fo:border="none"/>
      <style:text-properties/>
    </style:style>
    <style:style style:family="text" style:name="T581">
      <style:text-properties fo:color="#1f1f1f" fo:font-family="Arial" style:font-family-asian="Arial" style:font-family-complex="Arial" fo:font-size="12pt"/>
    </style:style>
    <style:style style:parent-style-name="141" style:family="paragraph" style:name="P13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82">
      <style:text-properties fo:color="#1f1f1f" fo:font-family="Arial" style:font-family-asian="Arial" style:font-family-complex="Arial" fo:font-size="14pt" fo:font-weight="bold"/>
    </style:style>
    <style:style style:family="paragraph" style:name="P132">
      <style:paragraph-properties fo:line-height="115%" fo:margin-left="0cm" fo:margin-right="0cm" fo:text-indent="0cm" fo:margin-top="0pt" fo:margin-bottom="0pt" fo:border="none"/>
      <style:text-properties/>
    </style:style>
    <style:style style:family="text" style:name="T583">
      <style:text-properties fo:color="#1f1f1f" fo:font-family="Arial" style:font-family-asian="Arial" style:font-family-complex="Arial" fo:font-size="12pt"/>
    </style:style>
    <style:style style:parent-style-name="142" style:family="paragraph" style:name="P13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84">
      <style:text-properties fo:color="#1f1f1f" fo:font-family="Arial" style:font-family-asian="Arial" style:font-family-complex="Arial" fo:font-size="12pt" fo:font-weight="bold"/>
    </style:style>
    <style:style style:family="paragraph" style:name="P134">
      <style:paragraph-properties fo:line-height="115%" fo:margin-left="0cm" fo:margin-right="0cm" fo:text-indent="0cm" fo:margin-top="0pt" fo:margin-bottom="0pt" fo:border="none"/>
      <style:text-properties/>
    </style:style>
    <style:style style:family="text" style:name="T585">
      <style:text-properties fo:color="#1f1f1f" fo:font-family="Arial" style:font-family-asian="Arial" style:font-family-complex="Arial" fo:font-size="12pt"/>
    </style:style>
    <style:style style:family="text" style:name="T586">
      <style:text-properties fo:color="#1f1f1f" fo:font-family="Arial" style:font-family-asian="Arial" style:font-family-complex="Arial" fo:font-size="12pt"/>
    </style:style>
    <style:style style:parent-style-name="142" style:family="paragraph" style:name="P13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87">
      <style:text-properties fo:color="#1f1f1f" fo:font-family="Arial" style:font-family-asian="Arial" style:font-family-complex="Arial" fo:font-size="12pt" fo:font-weight="bold"/>
    </style:style>
    <style:style style:family="paragraph" style:name="P136">
      <style:paragraph-properties fo:line-height="115%" fo:margin-left="0cm" fo:margin-right="0cm" fo:text-indent="0cm" fo:margin-top="0pt" fo:margin-bottom="0pt" fo:border="none"/>
      <style:text-properties/>
    </style:style>
    <style:style style:family="text" style:name="T588">
      <style:text-properties fo:color="#1f1f1f" fo:font-family="Arial" style:font-family-asian="Arial" style:font-family-complex="Arial" fo:font-size="12pt"/>
    </style:style>
    <style:style style:family="text" style:name="T589">
      <style:text-properties fo:color="#1f1f1f" fo:font-family="Arial" style:font-family-asian="Arial" style:font-family-complex="Arial" fo:font-size="12pt"/>
    </style:style>
    <style:style style:parent-style-name="142" style:family="paragraph" style:name="P13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90">
      <style:text-properties fo:color="#1f1f1f" fo:font-family="Arial" style:font-family-asian="Arial" style:font-family-complex="Arial" fo:font-size="12pt" fo:font-weight="bold"/>
    </style:style>
    <style:style style:family="paragraph" style:name="P138">
      <style:paragraph-properties fo:line-height="115%" fo:margin-left="0cm" fo:margin-right="0cm" fo:text-indent="0cm" fo:margin-top="0pt" fo:margin-bottom="0pt" fo:border="none"/>
      <style:text-properties/>
    </style:style>
    <style:style style:family="text" style:name="T591">
      <style:text-properties fo:color="#1f1f1f" fo:font-family="Arial" style:font-family-asian="Arial" style:font-family-complex="Arial" fo:font-size="12pt"/>
    </style:style>
    <style:style style:family="text" style:name="T592">
      <style:text-properties fo:color="#1f1f1f" fo:font-family="Arial" style:font-family-asian="Arial" style:font-family-complex="Arial" fo:font-size="12pt"/>
    </style:style>
    <style:style style:parent-style-name="142" style:family="paragraph" style:name="P13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593">
      <style:text-properties fo:color="#1f1f1f" fo:font-family="Arial" style:font-family-asian="Arial" style:font-family-complex="Arial" fo:font-size="12pt" fo:font-weight="bold"/>
    </style:style>
    <style:style style:family="paragraph" style:name="P140">
      <style:paragraph-properties fo:line-height="115%" fo:margin-left="0cm" fo:margin-right="0cm" fo:text-indent="0cm" fo:margin-top="0pt" fo:margin-bottom="0pt" fo:border="none"/>
      <style:text-properties/>
    </style:style>
    <style:style style:family="text" style:name="T594">
      <style:text-properties fo:color="#1f1f1f" fo:font-family="Arial" style:font-family-asian="Arial" style:font-family-complex="Arial" fo:font-size="12pt"/>
    </style:style>
    <style:style style:family="text" style:name="T595">
      <style:text-properties fo:color="#1f1f1f" fo:font-family="Arial" style:font-family-asian="Arial" style:font-family-complex="Arial" fo:font-size="12pt"/>
    </style:style>
    <style:style style:parent-style-name="141" style:family="paragraph" style:name="P14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596">
      <style:text-properties fo:color="#1f1f1f" fo:font-family="Arial" style:font-family-asian="Arial" style:font-family-complex="Arial" fo:font-size="14pt" fo:font-weight="bold"/>
    </style:style>
    <style:style style:parent-style-name="668" style:list-style-name="WWNum7" style:family="paragraph" style:name="P142">
      <style:paragraph-properties fo:line-height="115%" fo:margin-right="0cm" fo:margin-top="0pt" fo:margin-bottom="0pt" fo:border="none"/>
      <style:text-properties/>
    </style:style>
    <style:style style:family="text" style:name="T597">
      <style:text-properties fo:color="#1f1f1f" fo:font-family="Arial" style:font-family-asian="Arial" style:font-family-complex="Arial" fo:font-size="12pt"/>
    </style:style>
    <style:style style:parent-style-name="668" style:list-style-name="WWNum7" style:family="paragraph" style:name="P143">
      <style:paragraph-properties fo:line-height="115%" fo:margin-right="0cm" fo:margin-top="0pt" fo:margin-bottom="0pt" fo:border="none"/>
      <style:text-properties/>
    </style:style>
    <style:style style:family="text" style:name="T598">
      <style:text-properties fo:color="#1f1f1f" fo:font-family="Arial" style:font-family-asian="Arial" style:font-family-complex="Arial" fo:font-size="12pt"/>
    </style:style>
    <style:style style:parent-style-name="668" style:list-style-name="WWNum7" style:family="paragraph" style:name="P144">
      <style:paragraph-properties fo:line-height="115%" fo:margin-right="0cm" fo:margin-top="0pt" fo:margin-bottom="0pt" fo:border="none"/>
      <style:text-properties/>
    </style:style>
    <style:style style:family="text" style:name="T599">
      <style:text-properties fo:color="#1f1f1f" fo:font-family="Arial" style:font-family-asian="Arial" style:font-family-complex="Arial" fo:font-size="12pt"/>
    </style:style>
    <style:style style:parent-style-name="668" style:list-style-name="WWNum7" style:family="paragraph" style:name="P145">
      <style:paragraph-properties fo:line-height="115%" fo:margin-right="0cm" fo:margin-top="0pt" fo:margin-bottom="0pt" fo:border="none"/>
      <style:text-properties/>
    </style:style>
    <style:style style:family="text" style:name="T600">
      <style:text-properties fo:color="#1f1f1f" fo:font-family="Arial" style:font-family-asian="Arial" style:font-family-complex="Arial" fo:font-size="12pt"/>
    </style:style>
    <style:style style:family="paragraph" style:name="P146">
      <style:paragraph-properties/>
      <style:text-properties/>
    </style:style>
    <style:style style:family="paragraph" style:name="P147">
      <style:paragraph-properties fo:line-height="115%" fo:margin-left="0cm" fo:margin-right="0cm" fo:text-indent="0cm" fo:margin-top="0pt" fo:margin-bottom="0pt" fo:break-before="page" fo:border="none"/>
      <style:text-properties/>
    </style:style>
    <style:style style:family="text" style:name="T601">
      <style:text-properties fo:color="#1f1f1f" fo:font-family="Arial" style:font-family-asian="Arial" style:font-family-complex="Arial" fo:font-size="12pt"/>
    </style:style>
    <style:style style:parent-style-name="141" style:family="paragraph" style:name="P14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02">
      <style:text-properties fo:color="#1f1f1f" fo:font-family="Arial" style:font-family-asian="Arial" style:font-family-complex="Arial" fo:font-size="14pt" fo:font-weight="bold"/>
    </style:style>
    <style:style style:family="paragraph" style:name="P149">
      <style:paragraph-properties fo:line-height="115%" fo:margin-left="0cm" fo:margin-right="0cm" fo:text-indent="0cm" fo:margin-top="0pt" fo:margin-bottom="0pt" fo:border="none"/>
      <style:text-properties/>
    </style:style>
    <style:style style:family="text" style:name="T603">
      <style:text-properties fo:color="#1f1f1f" fo:font-family="Arial" style:font-family-asian="Arial" style:font-family-complex="Arial" fo:font-size="12pt"/>
    </style:style>
    <style:style style:parent-style-name="142" style:family="paragraph" style:name="P1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04">
      <style:text-properties fo:color="#1f1f1f" fo:font-family="Arial" style:font-family-asian="Arial" style:font-family-complex="Arial" fo:font-size="12pt" fo:font-weight="bold"/>
    </style:style>
    <style:style style:family="paragraph" style:name="P151">
      <style:paragraph-properties fo:line-height="115%" fo:margin-left="0cm" fo:margin-right="0cm" fo:text-indent="0cm" fo:margin-top="0pt" fo:margin-bottom="0pt" fo:border="none"/>
      <style:text-properties/>
    </style:style>
    <style:style style:family="text" style:name="T605">
      <style:text-properties fo:color="#1f1f1f" fo:font-family="Arial" style:font-family-asian="Arial" style:font-family-complex="Arial" fo:font-size="12pt"/>
    </style:style>
    <style:style style:parent-style-name="142" style:family="paragraph" style:name="P1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06">
      <style:text-properties fo:color="#1f1f1f" fo:font-family="Arial" style:font-family-asian="Arial" style:font-family-complex="Arial" fo:font-size="12pt" fo:font-weight="bold"/>
    </style:style>
    <style:style style:family="paragraph" style:name="P153">
      <style:paragraph-properties fo:line-height="115%" fo:margin-left="0cm" fo:margin-right="0cm" fo:text-indent="0cm" fo:margin-top="0pt" fo:margin-bottom="0pt" fo:border="none"/>
      <style:text-properties/>
    </style:style>
    <style:style style:family="text" style:name="T607">
      <style:text-properties fo:color="#1f1f1f" fo:font-family="Arial" style:font-family-asian="Arial" style:font-family-complex="Arial" fo:font-size="12pt"/>
    </style:style>
    <style:style style:parent-style-name="142" style:family="paragraph" style:name="P1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08">
      <style:text-properties fo:color="#1f1f1f" fo:font-family="Arial" style:font-family-asian="Arial" style:font-family-complex="Arial" fo:font-size="12pt" fo:font-weight="bold"/>
    </style:style>
    <style:style style:family="paragraph" style:name="P155">
      <style:paragraph-properties fo:line-height="115%" fo:margin-left="0cm" fo:margin-right="0cm" fo:text-indent="0cm" fo:margin-top="0pt" fo:margin-bottom="0pt" fo:border="none"/>
      <style:text-properties/>
    </style:style>
    <style:style style:family="text" style:name="T609">
      <style:text-properties fo:color="#1f1f1f" fo:font-family="Arial" style:font-family-asian="Arial" style:font-family-complex="Arial" fo:font-size="12pt"/>
    </style:style>
    <style:style style:parent-style-name="142" style:family="paragraph" style:name="P1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10">
      <style:text-properties fo:color="#1f1f1f" fo:font-family="Arial" style:font-family-asian="Arial" style:font-family-complex="Arial" fo:font-size="12pt" fo:font-weight="bold"/>
    </style:style>
    <style:style style:family="paragraph" style:name="P157">
      <style:paragraph-properties fo:line-height="115%" fo:margin-left="0cm" fo:margin-right="0cm" fo:text-indent="0cm" fo:margin-top="0pt" fo:margin-bottom="0pt" fo:border="none"/>
      <style:text-properties/>
    </style:style>
    <style:style style:family="text" style:name="T611">
      <style:text-properties fo:color="#1f1f1f" fo:font-family="Arial" style:font-family-asian="Arial" style:font-family-complex="Arial" fo:font-size="12pt"/>
    </style:style>
    <style:style style:family="table" style:name="ta1">
      <style:paragraph-properties fo:line-height="100%" fo:margin-bottom="0pt"/>
      <style:table-properties style:width="9.3cm" fo:margin-left="0cm" table:align="left" style:use-optimal-column-width="true"/>
    </style:style>
    <style:style style:family="table-column" style:name="co1">
      <style:table-column-properties style:column-width="1.177cm" style:use-optimal-column-width="true"/>
    </style:style>
    <style:style style:family="table-column" style:name="co2">
      <style:table-column-properties style:column-width="3.844cm" style:use-optimal-column-width="true"/>
    </style:style>
    <style:style style:family="table-column" style:name="co3">
      <style:table-column-properties style:column-width="4.279cm" style:use-optimal-column-width="true"/>
    </style:style>
    <style:style style:family="table-row" style:name="ro1">
      <style:table-row-properties/>
    </style:style>
    <style:style style:family="table-cell" style:name="ce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58">
      <style:paragraph-properties style:line-height-at-least="12pt" fo:margin-top="0pt" fo:margin-bottom="0pt"/>
      <style:text-properties/>
    </style:style>
    <style:style style:family="text" style:name="T612">
      <style:text-properties fo:color="#1f1f1f" fo:font-family="Arial" style:font-family-asian="Arial" style:font-family-complex="Arial" fo:font-size="12pt" fo:font-weight="bold"/>
    </style:style>
    <style:style style:family="table-cell" style:name="ce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59">
      <style:paragraph-properties style:line-height-at-least="12pt" fo:margin-top="0pt" fo:margin-bottom="0pt"/>
      <style:text-properties/>
    </style:style>
    <style:style style:family="text" style:name="T613">
      <style:text-properties fo:color="#1f1f1f" fo:font-family="Arial" style:font-family-asian="Arial" style:font-family-complex="Arial" fo:font-size="12pt" fo:font-weight="bold"/>
    </style:style>
    <style:style style:family="table-cell" style:name="ce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60">
      <style:paragraph-properties style:line-height-at-least="12pt" fo:margin-top="0pt" fo:margin-bottom="0pt"/>
      <style:text-properties/>
    </style:style>
    <style:style style:family="text" style:name="T614">
      <style:text-properties fo:color="#1f1f1f" fo:font-family="Arial" style:font-family-asian="Arial" style:font-family-complex="Arial" fo:font-size="12pt" fo:font-weight="bold"/>
    </style:style>
    <style:style style:family="table-row" style:name="ro2">
      <style:table-row-properties/>
    </style:style>
    <style:style style:family="table-cell" style:name="ce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61">
      <style:paragraph-properties style:line-height-at-least="12pt" fo:margin-top="0pt" fo:margin-bottom="0pt"/>
      <style:text-properties/>
    </style:style>
    <style:style style:family="text" style:name="T615">
      <style:text-properties fo:color="#1f1f1f" fo:font-family="Arial" style:font-family-asian="Arial" style:font-family-complex="Arial" fo:font-size="12pt"/>
    </style:style>
    <style:style style:family="table-cell" style:name="ce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62">
      <style:paragraph-properties style:line-height-at-least="12pt" fo:margin-top="0pt" fo:margin-bottom="0pt"/>
      <style:text-properties/>
    </style:style>
    <style:style style:family="text" style:name="T616">
      <style:text-properties fo:color="#1f1f1f" fo:font-family="Arial" style:font-family-asian="Arial" style:font-family-complex="Arial" fo:font-size="12pt"/>
    </style:style>
    <style:style style:family="table-cell" style:name="ce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63">
      <style:paragraph-properties style:line-height-at-least="12pt" fo:margin-top="0pt" fo:margin-bottom="0pt"/>
      <style:text-properties/>
    </style:style>
    <style:style style:family="text" style:name="T617">
      <style:text-properties fo:color="#1f1f1f" fo:font-family="Arial" style:font-family-asian="Arial" style:font-family-complex="Arial" fo:font-size="12pt"/>
    </style:style>
    <style:style style:family="table-row" style:name="ro3">
      <style:table-row-properties/>
    </style:style>
    <style:style style:family="table-cell" style:name="ce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64">
      <style:paragraph-properties style:line-height-at-least="12pt" fo:margin-top="0pt" fo:margin-bottom="0pt"/>
      <style:text-properties/>
    </style:style>
    <style:style style:family="text" style:name="T618">
      <style:text-properties fo:color="#1f1f1f" fo:font-family="Arial" style:font-family-asian="Arial" style:font-family-complex="Arial" fo:font-size="12pt"/>
    </style:style>
    <style:style style:family="table-cell" style:name="ce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65">
      <style:paragraph-properties style:line-height-at-least="12pt" fo:margin-top="0pt" fo:margin-bottom="0pt"/>
      <style:text-properties/>
    </style:style>
    <style:style style:family="text" style:name="T619">
      <style:text-properties fo:color="#1f1f1f" fo:font-family="Arial" style:font-family-asian="Arial" style:font-family-complex="Arial" fo:font-size="12pt"/>
    </style:style>
    <style:style style:family="table-cell" style:name="ce1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66">
      <style:paragraph-properties style:line-height-at-least="12pt" fo:margin-top="0pt" fo:margin-bottom="0pt"/>
      <style:text-properties/>
    </style:style>
    <style:style style:family="text" style:name="T620">
      <style:text-properties fo:color="#1f1f1f" fo:font-family="Arial" style:font-family-asian="Arial" style:font-family-complex="Arial" fo:font-size="12pt"/>
    </style:style>
    <style:style style:parent-style-name="141" style:family="paragraph" style:name="P16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21">
      <style:text-properties fo:color="#1f1f1f" fo:font-family="Arial" style:font-family-asian="Arial" style:font-family-complex="Arial" fo:font-size="14pt" fo:font-weight="bold"/>
    </style:style>
    <style:style style:parent-style-name="668" style:list-style-name="WWNum8" style:family="paragraph" style:name="P168">
      <style:paragraph-properties fo:line-height="115%" fo:margin-right="0cm" fo:margin-top="0pt" fo:margin-bottom="0pt" fo:border="none"/>
      <style:text-properties/>
    </style:style>
    <style:style style:family="text" style:name="T622">
      <style:text-properties fo:color="#1f1f1f" fo:font-family="Arial" style:font-family-asian="Arial" style:font-family-complex="Arial" fo:font-size="12pt"/>
    </style:style>
    <style:style style:parent-style-name="668" style:list-style-name="WWNum8" style:family="paragraph" style:name="P169">
      <style:paragraph-properties fo:line-height="115%" fo:margin-right="0cm" fo:margin-top="0pt" fo:margin-bottom="0pt" fo:border="none"/>
      <style:text-properties/>
    </style:style>
    <style:style style:family="text" style:name="T623">
      <style:text-properties fo:color="#1f1f1f" fo:font-family="Arial" style:font-family-asian="Arial" style:font-family-complex="Arial" fo:font-size="12pt"/>
    </style:style>
    <style:style style:parent-style-name="668" style:list-style-name="WWNum8" style:family="paragraph" style:name="P170">
      <style:paragraph-properties fo:line-height="115%" fo:margin-right="0cm" fo:margin-top="0pt" fo:margin-bottom="0pt" fo:border="none"/>
      <style:text-properties/>
    </style:style>
    <style:style style:family="text" style:name="T624">
      <style:text-properties fo:color="#1f1f1f" fo:font-family="Arial" style:font-family-asian="Arial" style:font-family-complex="Arial" fo:font-size="12pt"/>
    </style:style>
    <style:style style:parent-style-name="668" style:list-style-name="WWNum8" style:family="paragraph" style:name="P171">
      <style:paragraph-properties fo:line-height="115%" fo:margin-right="0cm" fo:margin-top="0pt" fo:margin-bottom="0pt" fo:border="none"/>
      <style:text-properties/>
    </style:style>
    <style:style style:family="text" style:name="T625">
      <style:text-properties fo:color="#1f1f1f" fo:font-family="Arial" style:font-family-asian="Arial" style:font-family-complex="Arial" fo:font-size="12pt"/>
    </style:style>
    <style:style style:family="paragraph" style:name="P172">
      <style:paragraph-properties/>
      <style:text-properties/>
    </style:style>
    <style:style style:parent-style-name="141" style:family="paragraph" style:name="P17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626">
      <style:text-properties fo:color="#1f1f1f" fo:font-family="Arial" style:font-family-asian="Arial" style:font-family-complex="Arial" fo:font-size="14pt" fo:font-weight="bold"/>
    </style:style>
    <style:style style:family="paragraph" style:name="P174">
      <style:paragraph-properties fo:line-height="115%" fo:margin-left="0cm" fo:margin-right="0cm" fo:text-indent="0cm" fo:margin-top="0pt" fo:margin-bottom="0pt" fo:border="none"/>
      <style:text-properties/>
    </style:style>
    <style:style style:family="text" style:name="T627">
      <style:text-properties fo:color="#1f1f1f" fo:font-family="Arial" style:font-family-asian="Arial" style:font-family-complex="Arial" fo:font-size="12pt"/>
    </style:style>
    <style:style style:parent-style-name="142" style:family="paragraph" style:name="P17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28">
      <style:text-properties fo:color="#1f1f1f" fo:font-family="Arial" style:font-family-asian="Arial" style:font-family-complex="Arial" fo:font-size="12pt" fo:font-weight="bold"/>
    </style:style>
    <style:style style:family="paragraph" style:name="P176">
      <style:paragraph-properties fo:line-height="115%" fo:margin-left="0cm" fo:margin-right="0cm" fo:text-indent="0cm" fo:margin-top="0pt" fo:margin-bottom="0pt" fo:border="none"/>
      <style:text-properties/>
    </style:style>
    <style:style style:family="text" style:name="T629">
      <style:text-properties fo:color="#1f1f1f" fo:font-family="Arial" style:font-family-asian="Arial" style:font-family-complex="Arial" fo:font-size="12pt"/>
    </style:style>
    <style:style style:parent-style-name="142" style:family="paragraph" style:name="P17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30">
      <style:text-properties fo:color="#1f1f1f" fo:font-family="Arial" style:font-family-asian="Arial" style:font-family-complex="Arial" fo:font-size="12pt" fo:font-weight="bold"/>
    </style:style>
    <style:style style:family="table" style:name="ta2">
      <style:paragraph-properties fo:line-height="100%" fo:margin-bottom="0pt"/>
      <style:table-properties style:width="10.62cm" fo:margin-left="0cm" table:align="left" style:use-optimal-column-width="true"/>
    </style:style>
    <style:style style:family="table-column" style:name="co4">
      <style:table-column-properties style:column-width="1.912cm" style:use-optimal-column-width="true"/>
    </style:style>
    <style:style style:family="table-column" style:name="co5">
      <style:table-column-properties style:column-width="3.438cm" style:use-optimal-column-width="true"/>
    </style:style>
    <style:style style:family="table-column" style:name="co6">
      <style:table-column-properties style:column-width="5.267cm" style:use-optimal-column-width="true"/>
    </style:style>
    <style:style style:family="table-row" style:name="ro4">
      <style:table-row-properties/>
    </style:style>
    <style:style style:family="table-cell" style:name="ce1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78">
      <style:paragraph-properties style:line-height-at-least="12pt" fo:margin-top="0pt" fo:margin-bottom="0pt"/>
      <style:text-properties/>
    </style:style>
    <style:style style:family="text" style:name="T631">
      <style:text-properties fo:color="#1f1f1f" fo:font-family="Arial" style:font-family-asian="Arial" style:font-family-complex="Arial" fo:font-size="12pt" fo:font-weight="bold"/>
    </style:style>
    <style:style style:family="table-cell" style:name="ce1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79">
      <style:paragraph-properties style:line-height-at-least="12pt" fo:margin-top="0pt" fo:margin-bottom="0pt"/>
      <style:text-properties/>
    </style:style>
    <style:style style:family="text" style:name="T632">
      <style:text-properties fo:color="#1f1f1f" fo:font-family="Arial" style:font-family-asian="Arial" style:font-family-complex="Arial" fo:font-size="12pt" fo:font-weight="bold"/>
    </style:style>
    <style:style style:family="table-cell" style:name="ce1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80">
      <style:paragraph-properties style:line-height-at-least="12pt" fo:margin-top="0pt" fo:margin-bottom="0pt"/>
      <style:text-properties/>
    </style:style>
    <style:style style:family="text" style:name="T633">
      <style:text-properties fo:color="#1f1f1f" fo:font-family="Arial" style:font-family-asian="Arial" style:font-family-complex="Arial" fo:font-size="12pt" fo:font-weight="bold"/>
    </style:style>
    <style:style style:family="table-row" style:name="ro5">
      <style:table-row-properties/>
    </style:style>
    <style:style style:family="table-cell" style:name="ce1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81">
      <style:paragraph-properties style:line-height-at-least="12pt" fo:margin-top="0pt" fo:margin-bottom="0pt"/>
      <style:text-properties/>
    </style:style>
    <style:style style:family="text" style:name="T634">
      <style:text-properties fo:color="#1f1f1f" fo:font-family="Arial" style:font-family-asian="Arial" style:font-family-complex="Arial" fo:font-size="12pt"/>
    </style:style>
    <style:style style:family="table-cell" style:name="ce1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82">
      <style:paragraph-properties style:line-height-at-least="12pt" fo:margin-top="0pt" fo:margin-bottom="0pt"/>
      <style:text-properties/>
    </style:style>
    <style:style style:family="text" style:name="T635">
      <style:text-properties fo:color="#1f1f1f" fo:font-family="Arial" style:font-family-asian="Arial" style:font-family-complex="Arial" fo:font-size="12pt"/>
    </style:style>
    <style:style style:family="table-cell" style:name="ce1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83">
      <style:paragraph-properties style:line-height-at-least="12pt" fo:margin-top="0pt" fo:margin-bottom="0pt"/>
      <style:text-properties/>
    </style:style>
    <style:style style:family="text" style:name="T636">
      <style:text-properties fo:color="#1f1f1f" fo:font-family="Arial" style:font-family-asian="Arial" style:font-family-complex="Arial" fo:font-size="12pt"/>
    </style:style>
    <style:style style:family="table-row" style:name="ro6">
      <style:table-row-properties/>
    </style:style>
    <style:style style:family="table-cell" style:name="ce1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84">
      <style:paragraph-properties style:line-height-at-least="12pt" fo:margin-top="0pt" fo:margin-bottom="0pt"/>
      <style:text-properties/>
    </style:style>
    <style:style style:family="text" style:name="T637">
      <style:text-properties fo:color="#1f1f1f" fo:font-family="Arial" style:font-family-asian="Arial" style:font-family-complex="Arial" fo:font-size="12pt"/>
    </style:style>
    <style:style style:family="table-cell" style:name="ce1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85">
      <style:paragraph-properties style:line-height-at-least="12pt" fo:margin-top="0pt" fo:margin-bottom="0pt"/>
      <style:text-properties/>
    </style:style>
    <style:style style:family="text" style:name="T638">
      <style:text-properties fo:color="#1f1f1f" fo:font-family="Arial" style:font-family-asian="Arial" style:font-family-complex="Arial" fo:font-size="12pt"/>
    </style:style>
    <style:style style:family="table-cell" style:name="ce2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186">
      <style:paragraph-properties style:line-height-at-least="12pt" fo:margin-top="0pt" fo:margin-bottom="0pt"/>
      <style:text-properties/>
    </style:style>
    <style:style style:family="text" style:name="T639">
      <style:text-properties fo:color="#1f1f1f" fo:font-family="Arial" style:font-family-asian="Arial" style:font-family-complex="Arial" fo:font-size="12pt"/>
    </style:style>
    <style:style style:family="paragraph" style:name="P187">
      <style:paragraph-properties fo:line-height="115%" fo:margin-left="0cm" fo:margin-right="0cm" fo:text-indent="0cm" fo:margin-top="0pt" fo:margin-bottom="0pt" fo:border="none"/>
      <style:text-properties/>
    </style:style>
    <style:style style:family="text" style:name="T640">
      <style:text-properties fo:color="#1f1f1f" fo:font-family="Arial" style:font-family-asian="Arial" style:font-family-complex="Arial" fo:font-size="12pt"/>
    </style:style>
    <style:style style:parent-style-name="142" style:family="paragraph" style:name="P18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41">
      <style:text-properties fo:color="#1f1f1f" fo:font-family="Arial" style:font-family-asian="Arial" style:font-family-complex="Arial" fo:font-size="12pt" fo:font-weight="bold"/>
    </style:style>
    <style:style style:family="paragraph" style:name="P189">
      <style:paragraph-properties fo:line-height="115%" fo:margin-left="0cm" fo:margin-right="0cm" fo:text-indent="0cm" fo:margin-top="0pt" fo:margin-bottom="0pt" fo:border="none"/>
      <style:text-properties/>
    </style:style>
    <style:style style:family="text" style:name="T642">
      <style:text-properties fo:color="#1f1f1f" fo:font-family="Arial" style:font-family-asian="Arial" style:font-family-complex="Arial" fo:font-size="12pt"/>
    </style:style>
    <style:style style:parent-style-name="142" style:family="paragraph" style:name="P19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43">
      <style:text-properties fo:color="#1f1f1f" fo:font-family="Arial" style:font-family-asian="Arial" style:font-family-complex="Arial" fo:font-size="12pt" fo:font-weight="bold"/>
    </style:style>
    <style:style style:family="paragraph" style:name="P191">
      <style:paragraph-properties fo:line-height="115%" fo:margin-left="0cm" fo:margin-right="0cm" fo:text-indent="0cm" fo:margin-top="0pt" fo:margin-bottom="0pt" fo:border="none"/>
      <style:text-properties/>
    </style:style>
    <style:style style:family="text" style:name="T644">
      <style:text-properties fo:color="#1f1f1f" fo:font-family="Arial" style:font-family-asian="Arial" style:font-family-complex="Arial" fo:font-size="12pt"/>
    </style:style>
    <style:style style:parent-style-name="141" style:family="paragraph" style:name="P19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45">
      <style:text-properties fo:color="#1f1f1f" fo:font-family="Arial" style:font-family-asian="Arial" style:font-family-complex="Arial" fo:font-size="14pt" fo:font-weight="bold"/>
    </style:style>
    <style:style style:parent-style-name="668" style:list-style-name="WWNum9" style:family="paragraph" style:name="P193">
      <style:paragraph-properties fo:line-height="115%" fo:margin-right="0cm" fo:margin-top="0pt" fo:margin-bottom="0pt" fo:border="none"/>
      <style:text-properties/>
    </style:style>
    <style:style style:family="text" style:name="T646">
      <style:text-properties fo:color="#1f1f1f" fo:font-family="Arial" style:font-family-asian="Arial" style:font-family-complex="Arial" fo:font-size="12pt"/>
    </style:style>
    <style:style style:parent-style-name="668" style:list-style-name="WWNum9" style:family="paragraph" style:name="P194">
      <style:paragraph-properties fo:line-height="115%" fo:margin-right="0cm" fo:margin-top="0pt" fo:margin-bottom="0pt" fo:border="none"/>
      <style:text-properties/>
    </style:style>
    <style:style style:family="text" style:name="T647">
      <style:text-properties fo:color="#1f1f1f" fo:font-family="Arial" style:font-family-asian="Arial" style:font-family-complex="Arial" fo:font-size="12pt"/>
    </style:style>
    <style:style style:parent-style-name="668" style:list-style-name="WWNum9" style:family="paragraph" style:name="P195">
      <style:paragraph-properties fo:line-height="115%" fo:margin-right="0cm" fo:margin-top="0pt" fo:margin-bottom="0pt" fo:border="none"/>
      <style:text-properties/>
    </style:style>
    <style:style style:family="text" style:name="T648">
      <style:text-properties fo:color="#1f1f1f" fo:font-family="Arial" style:font-family-asian="Arial" style:font-family-complex="Arial" fo:font-size="12pt"/>
    </style:style>
    <style:style style:parent-style-name="668" style:list-style-name="WWNum9" style:family="paragraph" style:name="P196">
      <style:paragraph-properties fo:line-height="115%" fo:margin-right="0cm" fo:margin-top="0pt" fo:margin-bottom="0pt" fo:border="none"/>
      <style:text-properties/>
    </style:style>
    <style:style style:family="text" style:name="T649">
      <style:text-properties fo:color="#1f1f1f" fo:font-family="Arial" style:font-family-asian="Arial" style:font-family-complex="Arial" fo:font-size="12pt"/>
    </style:style>
    <style:style style:family="paragraph" style:name="P197">
      <style:paragraph-properties/>
      <style:text-properties/>
    </style:style>
    <style:style style:family="paragraph" style:name="P198">
      <style:paragraph-properties fo:line-height="115%" fo:margin-left="0cm" fo:margin-right="0cm" fo:text-indent="0cm" fo:margin-top="0pt" fo:margin-bottom="0pt" fo:break-before="page" fo:border="none"/>
      <style:text-properties/>
    </style:style>
    <style:style style:family="text" style:name="T650">
      <style:text-properties fo:color="#1f1f1f" fo:font-family="Arial" style:font-family-asian="Arial" style:font-family-complex="Arial" fo:font-size="12pt"/>
    </style:style>
    <style:style style:parent-style-name="141" style:family="paragraph" style:name="P19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51">
      <style:text-properties fo:color="#1f1f1f" fo:font-family="Arial" style:font-family-asian="Arial" style:font-family-complex="Arial" fo:font-size="14pt" fo:font-weight="bold"/>
    </style:style>
    <style:style style:family="paragraph" style:name="P200">
      <style:paragraph-properties fo:line-height="115%" fo:margin-left="0cm" fo:margin-right="0cm" fo:text-indent="0cm" fo:margin-top="0pt" fo:margin-bottom="0pt" fo:border="none"/>
      <style:text-properties/>
    </style:style>
    <style:style style:family="text" style:name="T652">
      <style:text-properties fo:color="#1f1f1f" fo:font-family="Arial" style:font-family-asian="Arial" style:font-family-complex="Arial" fo:font-size="12pt"/>
    </style:style>
    <style:style style:parent-style-name="142" style:family="paragraph" style:name="P2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53">
      <style:text-properties fo:color="#1f1f1f" fo:font-family="Arial" style:font-family-asian="Arial" style:font-family-complex="Arial" fo:font-size="12pt" fo:font-weight="bold"/>
    </style:style>
    <style:style style:family="paragraph" style:name="P202">
      <style:paragraph-properties fo:line-height="115%" fo:margin-left="0cm" fo:margin-right="0cm" fo:text-indent="0cm" fo:margin-top="0pt" fo:margin-bottom="0pt" fo:border="none"/>
      <style:text-properties/>
    </style:style>
    <style:style style:family="text" style:name="T654">
      <style:text-properties fo:color="#1f1f1f" fo:font-family="Arial" style:font-family-asian="Arial" style:font-family-complex="Arial" fo:font-size="12pt"/>
    </style:style>
    <style:style style:family="text" style:name="T655">
      <style:text-properties fo:color="#1f1f1f" fo:font-family="Arial" style:font-family-asian="Arial" style:font-family-complex="Arial" fo:font-size="12pt"/>
    </style:style>
    <style:style style:parent-style-name="142" style:family="paragraph" style:name="P20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56">
      <style:text-properties fo:color="#1f1f1f" fo:font-family="Arial" style:font-family-asian="Arial" style:font-family-complex="Arial" fo:font-size="12pt" fo:font-weight="bold"/>
    </style:style>
    <style:style style:family="paragraph" style:name="P204">
      <style:paragraph-properties fo:line-height="115%" fo:margin-left="0cm" fo:margin-right="0cm" fo:text-indent="0cm" fo:margin-top="0pt" fo:margin-bottom="0pt" fo:border="none"/>
      <style:text-properties/>
    </style:style>
    <style:style style:family="text" style:name="T657">
      <style:text-properties fo:color="#1f1f1f" fo:font-family="Arial" style:font-family-asian="Arial" style:font-family-complex="Arial" fo:font-size="12pt"/>
    </style:style>
    <style:style style:parent-style-name="142" style:family="paragraph" style:name="P20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58">
      <style:text-properties fo:color="#1f1f1f" fo:font-family="Arial" style:font-family-asian="Arial" style:font-family-complex="Arial" fo:font-size="12pt" fo:font-weight="bold"/>
    </style:style>
    <style:style style:family="paragraph" style:name="P206">
      <style:paragraph-properties fo:line-height="115%" fo:margin-left="0cm" fo:margin-right="0cm" fo:text-indent="0cm" fo:margin-top="0pt" fo:margin-bottom="0pt" fo:border="none"/>
      <style:text-properties/>
    </style:style>
    <style:style style:family="text" style:name="T659">
      <style:text-properties fo:color="#1f1f1f" fo:font-family="Arial" style:font-family-asian="Arial" style:font-family-complex="Arial" fo:font-size="12pt"/>
    </style:style>
    <style:style style:family="text" style:name="T660">
      <style:text-properties fo:color="#1f1f1f" fo:font-family="Arial" style:font-family-asian="Arial" style:font-family-complex="Arial" fo:font-size="12pt"/>
    </style:style>
    <style:style style:parent-style-name="142" style:family="paragraph" style:name="P20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61">
      <style:text-properties fo:color="#1f1f1f" fo:font-family="Arial" style:font-family-asian="Arial" style:font-family-complex="Arial" fo:font-size="12pt" fo:font-weight="bold"/>
    </style:style>
    <style:style style:family="paragraph" style:name="P208">
      <style:paragraph-properties fo:line-height="115%" fo:margin-left="0cm" fo:margin-right="0cm" fo:text-indent="0cm" fo:margin-top="0pt" fo:margin-bottom="0pt" fo:border="none"/>
      <style:text-properties/>
    </style:style>
    <style:style style:family="text" style:name="T662">
      <style:text-properties fo:color="#1f1f1f" fo:font-family="Arial" style:font-family-asian="Arial" style:font-family-complex="Arial" fo:font-size="12pt"/>
    </style:style>
    <style:style style:family="text" style:name="T663">
      <style:text-properties fo:color="#1f1f1f" fo:font-family="Arial" style:font-family-asian="Arial" style:font-family-complex="Arial" fo:font-size="12pt"/>
    </style:style>
    <style:style style:parent-style-name="141" style:family="paragraph" style:name="P20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64">
      <style:text-properties fo:color="#1f1f1f" fo:font-family="Arial" style:font-family-asian="Arial" style:font-family-complex="Arial" fo:font-size="14pt" fo:font-weight="bold"/>
    </style:style>
    <style:style style:parent-style-name="668" style:list-style-name="WWNum10" style:family="paragraph" style:name="P210">
      <style:paragraph-properties fo:line-height="115%" fo:margin-right="0cm" fo:margin-top="0pt" fo:margin-bottom="0pt" fo:border="none"/>
      <style:text-properties/>
    </style:style>
    <style:style style:family="text" style:name="T665">
      <style:text-properties fo:color="#1f1f1f" fo:font-family="Arial" style:font-family-asian="Arial" style:font-family-complex="Arial" fo:font-size="12pt"/>
    </style:style>
    <style:style style:parent-style-name="668" style:list-style-name="WWNum10" style:family="paragraph" style:name="P211">
      <style:paragraph-properties fo:line-height="115%" fo:margin-right="0cm" fo:margin-top="0pt" fo:margin-bottom="0pt" fo:border="none"/>
      <style:text-properties/>
    </style:style>
    <style:style style:family="text" style:name="T666">
      <style:text-properties fo:color="#1f1f1f" fo:font-family="Arial" style:font-family-asian="Arial" style:font-family-complex="Arial" fo:font-size="12pt"/>
    </style:style>
    <style:style style:parent-style-name="668" style:list-style-name="WWNum10" style:family="paragraph" style:name="P212">
      <style:paragraph-properties fo:line-height="115%" fo:margin-right="0cm" fo:margin-top="0pt" fo:margin-bottom="0pt" fo:border="none"/>
      <style:text-properties/>
    </style:style>
    <style:style style:family="text" style:name="T667">
      <style:text-properties fo:color="#1f1f1f" fo:font-family="Arial" style:font-family-asian="Arial" style:font-family-complex="Arial" fo:font-size="12pt"/>
    </style:style>
    <style:style style:parent-style-name="668" style:list-style-name="WWNum10" style:family="paragraph" style:name="P213">
      <style:paragraph-properties fo:line-height="115%" fo:margin-right="0cm" fo:margin-top="0pt" fo:margin-bottom="0pt" fo:border="none"/>
      <style:text-properties/>
    </style:style>
    <style:style style:family="text" style:name="T668">
      <style:text-properties fo:color="#1f1f1f" fo:font-family="Arial" style:font-family-asian="Arial" style:font-family-complex="Arial" fo:font-size="12pt"/>
    </style:style>
    <style:style style:family="paragraph" style:name="P214">
      <style:paragraph-properties/>
      <style:text-properties/>
    </style:style>
    <style:style style:family="paragraph" style:name="P215">
      <style:paragraph-properties fo:line-height="115%" fo:margin-left="0cm" fo:margin-right="0cm" fo:text-indent="0cm" fo:margin-top="0pt" fo:margin-bottom="0pt" fo:break-before="page" fo:border="none"/>
      <style:text-properties/>
    </style:style>
    <style:style style:family="text" style:name="T669">
      <style:text-properties fo:color="#1f1f1f" fo:font-family="Arial" style:font-family-asian="Arial" style:font-family-complex="Arial" fo:font-size="12pt"/>
    </style:style>
    <style:style style:parent-style-name="141" style:family="paragraph" style:name="P21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70">
      <style:text-properties fo:color="#1f1f1f" fo:font-family="Arial" style:font-family-asian="Arial" style:font-family-complex="Arial" fo:font-size="14pt" fo:font-weight="bold"/>
    </style:style>
    <style:style style:family="paragraph" style:name="P217">
      <style:paragraph-properties fo:line-height="115%" fo:margin-left="0cm" fo:margin-right="0cm" fo:text-indent="0cm" fo:margin-top="0pt" fo:margin-bottom="0pt" fo:border="none"/>
      <style:text-properties/>
    </style:style>
    <style:style style:family="text" style:name="T671">
      <style:text-properties fo:color="#1f1f1f" fo:font-family="Arial" style:font-family-asian="Arial" style:font-family-complex="Arial" fo:font-size="12pt"/>
    </style:style>
    <style:style style:parent-style-name="142" style:family="paragraph" style:name="P21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72">
      <style:text-properties fo:color="#1f1f1f" fo:font-family="Arial" style:font-family-asian="Arial" style:font-family-complex="Arial" fo:font-size="12pt" fo:font-weight="bold"/>
    </style:style>
    <style:style style:family="paragraph" style:name="P219">
      <style:paragraph-properties fo:line-height="115%" fo:margin-left="0cm" fo:margin-right="0cm" fo:text-indent="0cm" fo:margin-top="0pt" fo:margin-bottom="0pt" fo:border="none"/>
      <style:text-properties/>
    </style:style>
    <style:style style:family="text" style:name="T673">
      <style:text-properties fo:color="#1f1f1f" fo:font-family="Arial" style:font-family-asian="Arial" style:font-family-complex="Arial" fo:font-size="12pt"/>
    </style:style>
    <style:style style:parent-style-name="142" style:family="paragraph" style:name="P22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74">
      <style:text-properties fo:color="#1f1f1f" fo:font-family="Arial" style:font-family-asian="Arial" style:font-family-complex="Arial" fo:font-size="12pt" fo:font-weight="bold"/>
    </style:style>
    <style:style style:family="paragraph" style:name="P221">
      <style:paragraph-properties fo:line-height="115%" fo:margin-left="0cm" fo:margin-right="0cm" fo:text-indent="0cm" fo:margin-top="0pt" fo:margin-bottom="0pt" fo:border="none"/>
      <style:text-properties/>
    </style:style>
    <style:style style:family="text" style:name="T675">
      <style:text-properties fo:color="#1f1f1f" fo:font-family="Arial" style:font-family-asian="Arial" style:font-family-complex="Arial" fo:font-size="12pt"/>
    </style:style>
    <style:style style:parent-style-name="142" style:family="paragraph" style:name="P22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76">
      <style:text-properties fo:color="#1f1f1f" fo:font-family="Arial" style:font-family-asian="Arial" style:font-family-complex="Arial" fo:font-size="12pt" fo:font-weight="bold"/>
    </style:style>
    <style:style style:family="paragraph" style:name="P223">
      <style:paragraph-properties fo:line-height="115%" fo:margin-left="0cm" fo:margin-right="0cm" fo:text-indent="0cm" fo:margin-top="0pt" fo:margin-bottom="0pt" fo:border="none"/>
      <style:text-properties/>
    </style:style>
    <style:style style:family="text" style:name="T677">
      <style:text-properties fo:color="#1f1f1f" fo:font-family="Arial" style:font-family-asian="Arial" style:font-family-complex="Arial" fo:font-size="12pt"/>
    </style:style>
    <style:style style:parent-style-name="142" style:family="paragraph" style:name="P22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78">
      <style:text-properties fo:color="#1f1f1f" fo:font-family="Arial" style:font-family-asian="Arial" style:font-family-complex="Arial" fo:font-size="12pt" fo:font-weight="bold"/>
    </style:style>
    <style:style style:family="paragraph" style:name="P225">
      <style:paragraph-properties fo:line-height="115%" fo:margin-left="0cm" fo:margin-right="0cm" fo:text-indent="0cm" fo:margin-top="0pt" fo:margin-bottom="0pt" fo:border="none"/>
      <style:text-properties/>
    </style:style>
    <style:style style:family="text" style:name="T679">
      <style:text-properties fo:color="#1f1f1f" fo:font-family="Arial" style:font-family-asian="Arial" style:font-family-complex="Arial" fo:font-size="12pt"/>
    </style:style>
    <style:style style:parent-style-name="141" style:family="paragraph" style:name="P22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80">
      <style:text-properties fo:color="#1f1f1f" fo:font-family="Arial" style:font-family-asian="Arial" style:font-family-complex="Arial" fo:font-size="14pt" fo:font-weight="bold"/>
    </style:style>
    <style:style style:parent-style-name="668" style:list-style-name="WWNum11" style:family="paragraph" style:name="P227">
      <style:paragraph-properties fo:line-height="115%" fo:margin-right="0cm" fo:margin-top="0pt" fo:margin-bottom="0pt" fo:border="none"/>
      <style:text-properties/>
    </style:style>
    <style:style style:family="text" style:name="T681">
      <style:text-properties fo:color="#1f1f1f" fo:font-family="Arial" style:font-family-asian="Arial" style:font-family-complex="Arial" fo:font-size="12pt"/>
    </style:style>
    <style:style style:parent-style-name="668" style:list-style-name="WWNum11" style:family="paragraph" style:name="P228">
      <style:paragraph-properties fo:line-height="115%" fo:margin-right="0cm" fo:margin-top="0pt" fo:margin-bottom="0pt" fo:border="none"/>
      <style:text-properties/>
    </style:style>
    <style:style style:family="text" style:name="T682">
      <style:text-properties fo:color="#1f1f1f" fo:font-family="Arial" style:font-family-asian="Arial" style:font-family-complex="Arial" fo:font-size="12pt"/>
    </style:style>
    <style:style style:parent-style-name="668" style:list-style-name="WWNum11" style:family="paragraph" style:name="P229">
      <style:paragraph-properties fo:line-height="115%" fo:margin-right="0cm" fo:margin-top="0pt" fo:margin-bottom="0pt" fo:border="none"/>
      <style:text-properties/>
    </style:style>
    <style:style style:family="text" style:name="T683">
      <style:text-properties fo:color="#1f1f1f" fo:font-family="Arial" style:font-family-asian="Arial" style:font-family-complex="Arial" fo:font-size="12pt"/>
    </style:style>
    <style:style style:parent-style-name="668" style:list-style-name="WWNum11" style:family="paragraph" style:name="P230">
      <style:paragraph-properties fo:line-height="115%" fo:margin-right="0cm" fo:margin-top="0pt" fo:margin-bottom="0pt" fo:border="none"/>
      <style:text-properties/>
    </style:style>
    <style:style style:family="text" style:name="T684">
      <style:text-properties fo:color="#1f1f1f" fo:font-family="Arial" style:font-family-asian="Arial" style:font-family-complex="Arial" fo:font-size="12pt"/>
    </style:style>
    <style:style style:family="paragraph" style:name="P231">
      <style:paragraph-properties/>
      <style:text-properties/>
    </style:style>
    <style:style style:family="paragraph" style:name="P232">
      <style:paragraph-properties fo:line-height="115%" fo:margin-left="0cm" fo:margin-right="0cm" fo:text-indent="0cm" fo:margin-top="0pt" fo:margin-bottom="0pt" fo:break-before="page" fo:border="none"/>
      <style:text-properties/>
    </style:style>
    <style:style style:family="text" style:name="T685">
      <style:text-properties fo:color="#1f1f1f" fo:font-family="Arial" style:font-family-asian="Arial" style:font-family-complex="Arial" fo:font-size="12pt"/>
    </style:style>
    <style:style style:parent-style-name="141" style:family="paragraph" style:name="P23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86">
      <style:text-properties fo:color="#1f1f1f" fo:font-family="Arial" style:font-family-asian="Arial" style:font-family-complex="Arial" fo:font-size="14pt" fo:font-weight="bold"/>
    </style:style>
    <style:style style:family="paragraph" style:name="P234">
      <style:paragraph-properties fo:line-height="115%" fo:margin-left="0cm" fo:margin-right="0cm" fo:text-indent="0cm" fo:margin-top="0pt" fo:margin-bottom="0pt" fo:border="none"/>
      <style:text-properties/>
    </style:style>
    <style:style style:family="text" style:name="T687">
      <style:text-properties fo:color="#1f1f1f" fo:font-family="Arial" style:font-family-asian="Arial" style:font-family-complex="Arial" fo:font-size="12pt"/>
    </style:style>
    <style:style style:parent-style-name="142" style:family="paragraph" style:name="P23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88">
      <style:text-properties fo:color="#1f1f1f" fo:font-family="Arial" style:font-family-asian="Arial" style:font-family-complex="Arial" fo:font-size="12pt" fo:font-weight="bold"/>
    </style:style>
    <style:style style:family="paragraph" style:name="P236">
      <style:paragraph-properties fo:line-height="115%" fo:margin-left="0cm" fo:margin-right="0cm" fo:text-indent="0cm" fo:margin-top="0pt" fo:margin-bottom="0pt" fo:border="none"/>
      <style:text-properties/>
    </style:style>
    <style:style style:family="text" style:name="T689">
      <style:text-properties fo:color="#1f1f1f" fo:font-family="Arial" style:font-family-asian="Arial" style:font-family-complex="Arial" fo:font-size="12pt"/>
    </style:style>
    <style:style style:parent-style-name="142" style:family="paragraph" style:name="P23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90">
      <style:text-properties fo:color="#1f1f1f" fo:font-family="Arial" style:font-family-asian="Arial" style:font-family-complex="Arial" fo:font-size="12pt" fo:font-weight="bold"/>
    </style:style>
    <style:style style:family="paragraph" style:name="P238">
      <style:paragraph-properties fo:line-height="115%" fo:margin-left="0cm" fo:margin-right="0cm" fo:text-indent="0cm" fo:margin-top="0pt" fo:margin-bottom="0pt" fo:border="none"/>
      <style:text-properties/>
    </style:style>
    <style:style style:family="text" style:name="T691">
      <style:text-properties fo:color="#1f1f1f" fo:font-family="Arial" style:font-family-asian="Arial" style:font-family-complex="Arial" fo:font-size="12pt"/>
    </style:style>
    <style:style style:parent-style-name="142" style:family="paragraph" style:name="P23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92">
      <style:text-properties fo:color="#1f1f1f" fo:font-family="Arial" style:font-family-asian="Arial" style:font-family-complex="Arial" fo:font-size="12pt" fo:font-weight="bold"/>
    </style:style>
    <style:style style:family="paragraph" style:name="P240">
      <style:paragraph-properties fo:line-height="115%" fo:margin-left="0cm" fo:margin-right="0cm" fo:text-indent="0cm" fo:margin-top="0pt" fo:margin-bottom="0pt" fo:border="none"/>
      <style:text-properties/>
    </style:style>
    <style:style style:family="text" style:name="T693">
      <style:text-properties fo:color="#1f1f1f" fo:font-family="Arial" style:font-family-asian="Arial" style:font-family-complex="Arial" fo:font-size="12pt"/>
    </style:style>
    <style:style style:parent-style-name="142" style:family="paragraph" style:name="P24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694">
      <style:text-properties fo:color="#1f1f1f" fo:font-family="Arial" style:font-family-asian="Arial" style:font-family-complex="Arial" fo:font-size="12pt" fo:font-weight="bold"/>
    </style:style>
    <style:style style:family="paragraph" style:name="P242">
      <style:paragraph-properties fo:line-height="115%" fo:margin-left="0cm" fo:margin-right="0cm" fo:text-indent="0cm" fo:margin-top="0pt" fo:margin-bottom="0pt" fo:border="none"/>
      <style:text-properties/>
    </style:style>
    <style:style style:family="text" style:name="T695">
      <style:text-properties fo:color="#1f1f1f" fo:font-family="Arial" style:font-family-asian="Arial" style:font-family-complex="Arial" fo:font-size="12pt"/>
    </style:style>
    <style:style style:parent-style-name="141" style:family="paragraph" style:name="P24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696">
      <style:text-properties fo:color="#1f1f1f" fo:font-family="Arial" style:font-family-asian="Arial" style:font-family-complex="Arial" fo:font-size="14pt" fo:font-weight="bold"/>
    </style:style>
    <style:style style:parent-style-name="668" style:list-style-name="WWNum12" style:family="paragraph" style:name="P244">
      <style:paragraph-properties fo:line-height="115%" fo:margin-right="0cm" fo:margin-top="0pt" fo:margin-bottom="0pt" fo:border="none"/>
      <style:text-properties/>
    </style:style>
    <style:style style:family="text" style:name="T697">
      <style:text-properties fo:color="#1f1f1f" fo:font-family="Arial" style:font-family-asian="Arial" style:font-family-complex="Arial" fo:font-size="12pt"/>
    </style:style>
    <style:style style:parent-style-name="668" style:list-style-name="WWNum12" style:family="paragraph" style:name="P245">
      <style:paragraph-properties fo:line-height="115%" fo:margin-right="0cm" fo:margin-top="0pt" fo:margin-bottom="0pt" fo:border="none"/>
      <style:text-properties/>
    </style:style>
    <style:style style:family="text" style:name="T698">
      <style:text-properties fo:color="#1f1f1f" fo:font-family="Arial" style:font-family-asian="Arial" style:font-family-complex="Arial" fo:font-size="12pt"/>
    </style:style>
    <style:style style:parent-style-name="668" style:list-style-name="WWNum12" style:family="paragraph" style:name="P246">
      <style:paragraph-properties fo:line-height="115%" fo:margin-right="0cm" fo:margin-top="0pt" fo:margin-bottom="0pt" fo:border="none"/>
      <style:text-properties/>
    </style:style>
    <style:style style:family="text" style:name="T699">
      <style:text-properties fo:color="#1f1f1f" fo:font-family="Arial" style:font-family-asian="Arial" style:font-family-complex="Arial" fo:font-size="12pt"/>
    </style:style>
    <style:style style:parent-style-name="668" style:list-style-name="WWNum12" style:family="paragraph" style:name="P247">
      <style:paragraph-properties fo:line-height="115%" fo:margin-right="0cm" fo:margin-top="0pt" fo:margin-bottom="0pt" fo:border="none"/>
      <style:text-properties/>
    </style:style>
    <style:style style:family="text" style:name="T700">
      <style:text-properties fo:color="#1f1f1f" fo:font-family="Arial" style:font-family-asian="Arial" style:font-family-complex="Arial" fo:font-size="12pt"/>
    </style:style>
    <style:style style:family="paragraph" style:name="P248">
      <style:paragraph-properties/>
      <style:text-properties/>
    </style:style>
    <style:style style:parent-style-name="141" style:family="paragraph" style:name="P24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01">
      <style:text-properties fo:color="#1f1f1f" fo:font-family="Arial" style:font-family-asian="Arial" style:font-family-complex="Arial" fo:font-size="14pt" fo:font-weight="bold"/>
    </style:style>
    <style:style style:family="paragraph" style:name="P250">
      <style:paragraph-properties fo:line-height="115%" fo:margin-left="0cm" fo:margin-right="0cm" fo:text-indent="0cm" fo:margin-top="0pt" fo:margin-bottom="0pt" fo:border="none"/>
      <style:text-properties/>
    </style:style>
    <style:style style:family="text" style:name="T702">
      <style:text-properties fo:color="#1f1f1f" fo:font-family="Arial" style:font-family-asian="Arial" style:font-family-complex="Arial" fo:font-size="12pt"/>
    </style:style>
    <style:style style:family="paragraph" style:name="P251">
      <style:paragraph-properties fo:line-height="115%" fo:margin-left="0cm" fo:margin-right="0cm" fo:text-indent="0cm" fo:margin-top="0pt" fo:margin-bottom="0pt" fo:border="none"/>
      <style:text-properties/>
    </style:style>
    <style:style style:family="text" style:name="T703">
      <style:text-properties fo:color="#1f1f1f" fo:font-family="Arial" style:font-family-asian="Arial" style:font-family-complex="Arial" fo:font-size="12pt"/>
    </style:style>
    <style:style style:family="text" style:name="T704">
      <style:text-properties fo:color="#1f1f1f" fo:font-family="Arial" style:font-family-asian="Arial" style:font-family-complex="Arial" fo:font-size="12pt"/>
    </style:style>
    <style:style style:family="paragraph" style:name="P252">
      <style:paragraph-properties fo:line-height="115%" fo:margin-left="0cm" fo:margin-right="0cm" fo:text-indent="0cm" fo:margin-top="0pt" fo:margin-bottom="0pt" fo:border="none"/>
      <style:text-properties/>
    </style:style>
    <style:style style:family="text" style:name="T705">
      <style:text-properties fo:color="#1f1f1f" fo:font-family="Arial" style:font-family-asian="Arial" style:font-family-complex="Arial" fo:font-size="12pt"/>
    </style:style>
    <style:style style:family="text" style:name="T706">
      <style:text-properties fo:color="#1f1f1f" fo:font-family="Arial" style:font-family-asian="Arial" style:font-family-complex="Arial" fo:font-size="12pt"/>
    </style:style>
    <style:style style:family="paragraph" style:name="P253">
      <style:paragraph-properties fo:line-height="115%" fo:margin-left="0cm" fo:margin-right="0cm" fo:text-indent="0cm" fo:margin-top="0pt" fo:margin-bottom="0pt" fo:border="none"/>
      <style:text-properties/>
    </style:style>
    <style:style style:family="text" style:name="T707">
      <style:text-properties fo:color="#1f1f1f" fo:font-family="Arial" style:font-family-asian="Arial" style:font-family-complex="Arial" fo:font-size="12pt"/>
    </style:style>
    <style:style style:family="paragraph" style:name="P254">
      <style:paragraph-properties fo:line-height="115%" fo:margin-left="0cm" fo:margin-right="0cm" fo:text-indent="0cm" fo:margin-top="0pt" fo:margin-bottom="0pt" fo:border="none"/>
      <style:text-properties/>
    </style:style>
    <style:style style:family="text" style:name="T708">
      <style:text-properties fo:color="#1f1f1f" fo:font-family="Arial" style:font-family-asian="Arial" style:font-family-complex="Arial" fo:font-size="12pt"/>
    </style:style>
    <style:style style:parent-style-name="141" style:family="paragraph" style:name="P25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09">
      <style:text-properties fo:color="#1f1f1f" fo:font-family="Arial" style:font-family-asian="Arial" style:font-family-complex="Arial" fo:font-size="14pt" fo:font-weight="bold"/>
    </style:style>
    <style:style style:parent-style-name="668" style:list-style-name="WWNum13" style:family="paragraph" style:name="P256">
      <style:paragraph-properties fo:line-height="115%" fo:margin-right="0cm" fo:margin-top="0pt" fo:margin-bottom="0pt" fo:border="none"/>
      <style:text-properties/>
    </style:style>
    <style:style style:family="text" style:name="T710">
      <style:text-properties fo:color="#1f1f1f" fo:font-family="Arial" style:font-family-asian="Arial" style:font-family-complex="Arial" fo:font-size="12pt"/>
    </style:style>
    <style:style style:parent-style-name="668" style:list-style-name="WWNum13" style:family="paragraph" style:name="P257">
      <style:paragraph-properties fo:line-height="115%" fo:margin-right="0cm" fo:margin-top="0pt" fo:margin-bottom="0pt" fo:border="none"/>
      <style:text-properties/>
    </style:style>
    <style:style style:family="text" style:name="T711">
      <style:text-properties fo:color="#1f1f1f" fo:font-family="Arial" style:font-family-asian="Arial" style:font-family-complex="Arial" fo:font-size="12pt"/>
    </style:style>
    <style:style style:parent-style-name="668" style:list-style-name="WWNum13" style:family="paragraph" style:name="P258">
      <style:paragraph-properties fo:line-height="115%" fo:margin-right="0cm" fo:margin-top="0pt" fo:margin-bottom="0pt" fo:border="none"/>
      <style:text-properties/>
    </style:style>
    <style:style style:family="text" style:name="T712">
      <style:text-properties fo:color="#1f1f1f" fo:font-family="Arial" style:font-family-asian="Arial" style:font-family-complex="Arial" fo:font-size="12pt"/>
    </style:style>
    <style:style style:parent-style-name="668" style:list-style-name="WWNum13" style:family="paragraph" style:name="P259">
      <style:paragraph-properties fo:line-height="115%" fo:margin-right="0cm" fo:margin-top="0pt" fo:margin-bottom="0pt" fo:border="none"/>
      <style:text-properties/>
    </style:style>
    <style:style style:family="text" style:name="T713">
      <style:text-properties fo:color="#1f1f1f" fo:font-family="Arial" style:font-family-asian="Arial" style:font-family-complex="Arial" fo:font-size="12pt"/>
    </style:style>
    <style:style style:family="paragraph" style:name="P260">
      <style:paragraph-properties/>
      <style:text-properties/>
    </style:style>
    <style:style style:parent-style-name="141" style:family="paragraph" style:name="P261">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14">
      <style:text-properties fo:color="#1f1f1f" fo:font-family="Arial" style:font-family-asian="Arial" style:font-family-complex="Arial" fo:font-size="14pt" fo:font-weight="bold"/>
    </style:style>
    <style:style style:family="paragraph" style:name="P262">
      <style:paragraph-properties fo:line-height="115%" fo:margin-left="0cm" fo:margin-right="0cm" fo:text-indent="0cm" fo:margin-top="0pt" fo:margin-bottom="0pt" fo:border="none"/>
      <style:text-properties/>
    </style:style>
    <style:style style:family="text" style:name="T715">
      <style:text-properties fo:color="#1f1f1f" fo:font-family="Arial" style:font-family-asian="Arial" style:font-family-complex="Arial" fo:font-size="12pt"/>
    </style:style>
    <style:style style:parent-style-name="142" style:family="paragraph" style:name="P26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16">
      <style:text-properties fo:color="#1f1f1f" fo:font-family="Arial" style:font-family-asian="Arial" style:font-family-complex="Arial" fo:font-size="12pt" fo:font-weight="bold"/>
    </style:style>
    <style:style style:family="paragraph" style:name="P264">
      <style:paragraph-properties fo:line-height="115%" fo:margin-left="0cm" fo:margin-right="0cm" fo:text-indent="0cm" fo:margin-top="0pt" fo:margin-bottom="0pt" fo:border="none"/>
      <style:text-properties/>
    </style:style>
    <style:style style:family="text" style:name="T717">
      <style:text-properties fo:color="#1f1f1f" fo:font-family="Arial" style:font-family-asian="Arial" style:font-family-complex="Arial" fo:font-size="12pt"/>
    </style:style>
    <style:style style:parent-style-name="142" style:family="paragraph" style:name="P26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18">
      <style:text-properties fo:color="#1f1f1f" fo:font-family="Arial" style:font-family-asian="Arial" style:font-family-complex="Arial" fo:font-size="12pt" fo:font-weight="bold"/>
    </style:style>
    <style:style style:family="paragraph" style:name="P266">
      <style:paragraph-properties fo:line-height="115%" fo:margin-left="0cm" fo:margin-right="0cm" fo:text-indent="0cm" fo:margin-top="0pt" fo:margin-bottom="0pt" fo:border="none"/>
      <style:text-properties/>
    </style:style>
    <style:style style:family="text" style:name="T719">
      <style:text-properties fo:color="#1f1f1f" fo:font-family="Arial" style:font-family-asian="Arial" style:font-family-complex="Arial" fo:font-size="12pt"/>
    </style:style>
    <style:style style:parent-style-name="142" style:family="paragraph" style:name="P26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20">
      <style:text-properties fo:color="#1f1f1f" fo:font-family="Arial" style:font-family-asian="Arial" style:font-family-complex="Arial" fo:font-size="12pt" fo:font-weight="bold"/>
    </style:style>
    <style:style style:family="paragraph" style:name="P268">
      <style:paragraph-properties fo:line-height="115%" fo:margin-left="0cm" fo:margin-right="0cm" fo:text-indent="0cm" fo:margin-top="0pt" fo:margin-bottom="0pt" fo:border="none"/>
      <style:text-properties/>
    </style:style>
    <style:style style:family="text" style:name="T721">
      <style:text-properties fo:color="#1f1f1f" fo:font-family="Arial" style:font-family-asian="Arial" style:font-family-complex="Arial" fo:font-size="12pt"/>
    </style:style>
    <style:style style:parent-style-name="142" style:family="paragraph" style:name="P26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22">
      <style:text-properties fo:color="#1f1f1f" fo:font-family="Arial" style:font-family-asian="Arial" style:font-family-complex="Arial" fo:font-size="12pt" fo:font-weight="bold"/>
    </style:style>
    <style:style style:family="paragraph" style:name="P270">
      <style:paragraph-properties fo:line-height="115%" fo:margin-left="0cm" fo:margin-right="0cm" fo:text-indent="0cm" fo:margin-top="0pt" fo:margin-bottom="0pt" fo:border="none"/>
      <style:text-properties/>
    </style:style>
    <style:style style:family="text" style:name="T723">
      <style:text-properties fo:color="#1f1f1f" fo:font-family="Arial" style:font-family-asian="Arial" style:font-family-complex="Arial" fo:font-size="12pt"/>
    </style:style>
    <style:style style:parent-style-name="141" style:family="paragraph" style:name="P27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24">
      <style:text-properties fo:color="#1f1f1f" fo:font-family="Arial" style:font-family-asian="Arial" style:font-family-complex="Arial" fo:font-size="14pt" fo:font-weight="bold"/>
    </style:style>
    <style:style style:parent-style-name="668" style:list-style-name="WWNum14" style:family="paragraph" style:name="P272">
      <style:paragraph-properties fo:line-height="115%" fo:margin-right="0cm" fo:margin-top="0pt" fo:margin-bottom="0pt" fo:border="none"/>
      <style:text-properties/>
    </style:style>
    <style:style style:family="text" style:name="T725">
      <style:text-properties fo:color="#1f1f1f" fo:font-family="Arial" style:font-family-asian="Arial" style:font-family-complex="Arial" fo:font-size="12pt"/>
    </style:style>
    <style:style style:parent-style-name="668" style:list-style-name="WWNum14" style:family="paragraph" style:name="P273">
      <style:paragraph-properties fo:line-height="115%" fo:margin-right="0cm" fo:margin-top="0pt" fo:margin-bottom="0pt" fo:border="none"/>
      <style:text-properties/>
    </style:style>
    <style:style style:family="text" style:name="T726">
      <style:text-properties fo:color="#1f1f1f" fo:font-family="Arial" style:font-family-asian="Arial" style:font-family-complex="Arial" fo:font-size="12pt"/>
    </style:style>
    <style:style style:parent-style-name="668" style:list-style-name="WWNum14" style:family="paragraph" style:name="P274">
      <style:paragraph-properties fo:line-height="115%" fo:margin-right="0cm" fo:margin-top="0pt" fo:margin-bottom="0pt" fo:border="none"/>
      <style:text-properties/>
    </style:style>
    <style:style style:family="text" style:name="T727">
      <style:text-properties fo:color="#1f1f1f" fo:font-family="Arial" style:font-family-asian="Arial" style:font-family-complex="Arial" fo:font-size="12pt"/>
    </style:style>
    <style:style style:parent-style-name="668" style:list-style-name="WWNum14" style:family="paragraph" style:name="P275">
      <style:paragraph-properties fo:line-height="115%" fo:margin-right="0cm" fo:margin-top="0pt" fo:margin-bottom="0pt" fo:border="none"/>
      <style:text-properties/>
    </style:style>
    <style:style style:family="text" style:name="T728">
      <style:text-properties fo:color="#1f1f1f" fo:font-family="Arial" style:font-family-asian="Arial" style:font-family-complex="Arial" fo:font-size="12pt"/>
    </style:style>
    <style:style style:family="paragraph" style:name="P276">
      <style:paragraph-properties/>
      <style:text-properties/>
    </style:style>
    <style:style style:parent-style-name="141" style:family="paragraph" style:name="P27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29">
      <style:text-properties fo:color="#1f1f1f" fo:font-family="Arial" style:font-family-asian="Arial" style:font-family-complex="Arial" fo:font-size="14pt" fo:font-weight="bold"/>
    </style:style>
    <style:style style:family="paragraph" style:name="P278">
      <style:paragraph-properties fo:line-height="115%" fo:margin-left="0cm" fo:margin-right="0cm" fo:text-indent="0cm" fo:margin-top="0pt" fo:margin-bottom="0pt" fo:border="none"/>
      <style:text-properties/>
    </style:style>
    <style:style style:family="text" style:name="T730">
      <style:text-properties fo:color="#1f1f1f" fo:font-family="Arial" style:font-family-asian="Arial" style:font-family-complex="Arial" fo:font-size="12pt"/>
    </style:style>
    <style:style style:parent-style-name="142" style:family="paragraph" style:name="P27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31">
      <style:text-properties fo:color="#1f1f1f" fo:font-family="Arial" style:font-family-asian="Arial" style:font-family-complex="Arial" fo:font-size="12pt" fo:font-weight="bold"/>
    </style:style>
    <style:style style:family="paragraph" style:name="P280">
      <style:paragraph-properties fo:line-height="115%" fo:margin-left="0cm" fo:margin-right="0cm" fo:text-indent="0cm" fo:margin-top="0pt" fo:margin-bottom="0pt" fo:border="none"/>
      <style:text-properties/>
    </style:style>
    <style:style style:family="text" style:name="T732">
      <style:text-properties fo:color="#1f1f1f" fo:font-family="Arial" style:font-family-asian="Arial" style:font-family-complex="Arial" fo:font-size="12pt"/>
    </style:style>
    <style:style style:family="text" style:name="T733">
      <style:text-properties fo:color="#1f1f1f" fo:font-family="Arial" style:font-family-asian="Arial" style:font-family-complex="Arial" fo:font-size="12pt"/>
    </style:style>
    <style:style style:parent-style-name="142" style:family="paragraph" style:name="P28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34">
      <style:text-properties fo:color="#1f1f1f" fo:font-family="Arial" style:font-family-asian="Arial" style:font-family-complex="Arial" fo:font-size="12pt" fo:font-weight="bold"/>
    </style:style>
    <style:style style:family="paragraph" style:name="P282">
      <style:paragraph-properties fo:line-height="115%" fo:margin-left="0cm" fo:margin-right="0cm" fo:text-indent="0cm" fo:margin-top="0pt" fo:margin-bottom="0pt" fo:border="none"/>
      <style:text-properties/>
    </style:style>
    <style:style style:family="text" style:name="T735">
      <style:text-properties fo:color="#1f1f1f" fo:font-family="Arial" style:font-family-asian="Arial" style:font-family-complex="Arial" fo:font-size="12pt"/>
    </style:style>
    <style:style style:parent-style-name="142" style:family="paragraph" style:name="P28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36">
      <style:text-properties fo:color="#1f1f1f" fo:font-family="Arial" style:font-family-asian="Arial" style:font-family-complex="Arial" fo:font-size="12pt" fo:font-weight="bold"/>
    </style:style>
    <style:style style:family="paragraph" style:name="P284">
      <style:paragraph-properties fo:line-height="115%" fo:margin-left="0cm" fo:margin-right="0cm" fo:text-indent="0cm" fo:margin-top="0pt" fo:margin-bottom="0pt" fo:border="none"/>
      <style:text-properties/>
    </style:style>
    <style:style style:family="text" style:name="T737">
      <style:text-properties fo:color="#1f1f1f" fo:font-family="Arial" style:font-family-asian="Arial" style:font-family-complex="Arial" fo:font-size="12pt"/>
    </style:style>
    <style:style style:parent-style-name="142" style:family="paragraph" style:name="P28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38">
      <style:text-properties fo:color="#1f1f1f" fo:font-family="Arial" style:font-family-asian="Arial" style:font-family-complex="Arial" fo:font-size="12pt" fo:font-weight="bold"/>
    </style:style>
    <style:style style:family="paragraph" style:name="P286">
      <style:paragraph-properties fo:line-height="115%" fo:margin-left="0cm" fo:margin-right="0cm" fo:text-indent="0cm" fo:margin-top="0pt" fo:margin-bottom="0pt" fo:border="none"/>
      <style:text-properties/>
    </style:style>
    <style:style style:family="text" style:name="T739">
      <style:text-properties fo:color="#1f1f1f" fo:font-family="Arial" style:font-family-asian="Arial" style:font-family-complex="Arial" fo:font-size="12pt"/>
    </style:style>
    <style:style style:parent-style-name="141" style:family="paragraph" style:name="P28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40">
      <style:text-properties fo:color="#1f1f1f" fo:font-family="Arial" style:font-family-asian="Arial" style:font-family-complex="Arial" fo:font-size="14pt" fo:font-weight="bold"/>
    </style:style>
    <style:style style:parent-style-name="668" style:list-style-name="WWNum15" style:family="paragraph" style:name="P288">
      <style:paragraph-properties fo:line-height="115%" fo:margin-right="0cm" fo:margin-top="0pt" fo:margin-bottom="0pt" fo:border="none"/>
      <style:text-properties/>
    </style:style>
    <style:style style:family="text" style:name="T741">
      <style:text-properties fo:color="#1f1f1f" fo:font-family="Arial" style:font-family-asian="Arial" style:font-family-complex="Arial" fo:font-size="12pt"/>
    </style:style>
    <style:style style:parent-style-name="668" style:list-style-name="WWNum15" style:family="paragraph" style:name="P289">
      <style:paragraph-properties fo:line-height="115%" fo:margin-right="0cm" fo:margin-top="0pt" fo:margin-bottom="0pt" fo:border="none"/>
      <style:text-properties/>
    </style:style>
    <style:style style:family="text" style:name="T742">
      <style:text-properties fo:color="#1f1f1f" fo:font-family="Arial" style:font-family-asian="Arial" style:font-family-complex="Arial" fo:font-size="12pt"/>
    </style:style>
    <style:style style:parent-style-name="668" style:list-style-name="WWNum15" style:family="paragraph" style:name="P290">
      <style:paragraph-properties fo:line-height="115%" fo:margin-right="0cm" fo:margin-top="0pt" fo:margin-bottom="0pt" fo:border="none"/>
      <style:text-properties/>
    </style:style>
    <style:style style:family="text" style:name="T743">
      <style:text-properties fo:color="#1f1f1f" fo:font-family="Arial" style:font-family-asian="Arial" style:font-family-complex="Arial" fo:font-size="12pt"/>
    </style:style>
    <style:style style:parent-style-name="668" style:list-style-name="WWNum15" style:family="paragraph" style:name="P291">
      <style:paragraph-properties fo:line-height="115%" fo:margin-right="0cm" fo:margin-top="0pt" fo:margin-bottom="0pt" fo:border="none"/>
      <style:text-properties/>
    </style:style>
    <style:style style:family="text" style:name="T744">
      <style:text-properties fo:color="#1f1f1f" fo:font-family="Arial" style:font-family-asian="Arial" style:font-family-complex="Arial" fo:font-size="12pt"/>
    </style:style>
    <style:style style:family="paragraph" style:name="P292">
      <style:paragraph-properties/>
      <style:text-properties/>
    </style:style>
    <style:style style:family="paragraph" style:name="P293">
      <style:paragraph-properties fo:line-height="115%" fo:margin-left="0cm" fo:margin-right="0cm" fo:text-indent="0cm" fo:margin-top="0pt" fo:margin-bottom="0pt" fo:break-before="page" fo:border="none"/>
      <style:text-properties/>
    </style:style>
    <style:style style:family="text" style:name="T745">
      <style:text-properties fo:color="#1f1f1f" fo:font-family="Arial" style:font-family-asian="Arial" style:font-family-complex="Arial" fo:font-size="12pt"/>
    </style:style>
    <style:style style:parent-style-name="141" style:family="paragraph" style:name="P29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46">
      <style:text-properties fo:color="#1f1f1f" fo:font-family="Arial" style:font-family-asian="Arial" style:font-family-complex="Arial" fo:font-size="14pt" fo:font-weight="bold"/>
    </style:style>
    <style:style style:family="paragraph" style:name="P295">
      <style:paragraph-properties fo:line-height="115%" fo:margin-left="0cm" fo:margin-right="0cm" fo:text-indent="0cm" fo:margin-top="0pt" fo:margin-bottom="0pt" fo:border="none"/>
      <style:text-properties/>
    </style:style>
    <style:style style:family="text" style:name="T747">
      <style:text-properties fo:color="#1f1f1f" fo:font-family="Arial" style:font-family-asian="Arial" style:font-family-complex="Arial" fo:font-size="12pt"/>
    </style:style>
    <style:style style:parent-style-name="142" style:family="paragraph" style:name="P29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48">
      <style:text-properties fo:color="#1f1f1f" fo:font-family="Arial" style:font-family-asian="Arial" style:font-family-complex="Arial" fo:font-size="12pt" fo:font-weight="bold"/>
    </style:style>
    <style:style style:family="paragraph" style:name="P297">
      <style:paragraph-properties fo:line-height="115%" fo:margin-left="0cm" fo:margin-right="0cm" fo:text-indent="0cm" fo:margin-top="0pt" fo:margin-bottom="0pt" fo:border="none"/>
      <style:text-properties/>
    </style:style>
    <style:style style:family="text" style:name="T749">
      <style:text-properties fo:color="#1f1f1f" fo:font-family="Arial" style:font-family-asian="Arial" style:font-family-complex="Arial" fo:font-size="12pt"/>
    </style:style>
    <style:style style:parent-style-name="142" style:family="paragraph" style:name="P29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50">
      <style:text-properties fo:color="#1f1f1f" fo:font-family="Arial" style:font-family-asian="Arial" style:font-family-complex="Arial" fo:font-size="12pt" fo:font-weight="bold"/>
    </style:style>
    <style:style style:family="paragraph" style:name="P299">
      <style:paragraph-properties fo:line-height="115%" fo:margin-left="0cm" fo:margin-right="0cm" fo:text-indent="0cm" fo:margin-top="0pt" fo:margin-bottom="0pt" fo:border="none"/>
      <style:text-properties/>
    </style:style>
    <style:style style:family="text" style:name="T751">
      <style:text-properties fo:color="#1f1f1f" fo:font-family="Arial" style:font-family-asian="Arial" style:font-family-complex="Arial" fo:font-size="12pt"/>
    </style:style>
    <style:style style:parent-style-name="142" style:family="paragraph" style:name="P30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52">
      <style:text-properties fo:color="#1f1f1f" fo:font-family="Arial" style:font-family-asian="Arial" style:font-family-complex="Arial" fo:font-size="12pt" fo:font-weight="bold"/>
    </style:style>
    <style:style style:family="paragraph" style:name="P301">
      <style:paragraph-properties fo:line-height="115%" fo:margin-left="0cm" fo:margin-right="0cm" fo:text-indent="0cm" fo:margin-top="0pt" fo:margin-bottom="0pt" fo:border="none"/>
      <style:text-properties/>
    </style:style>
    <style:style style:family="text" style:name="T753">
      <style:text-properties fo:color="#1f1f1f" fo:font-family="Arial" style:font-family-asian="Arial" style:font-family-complex="Arial" fo:font-size="12pt"/>
    </style:style>
    <style:style style:parent-style-name="142" style:family="paragraph" style:name="P30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54">
      <style:text-properties fo:color="#1f1f1f" fo:font-family="Arial" style:font-family-asian="Arial" style:font-family-complex="Arial" fo:font-size="12pt" fo:font-weight="bold"/>
    </style:style>
    <style:style style:family="paragraph" style:name="P303">
      <style:paragraph-properties fo:line-height="115%" fo:margin-left="0cm" fo:margin-right="0cm" fo:text-indent="0cm" fo:margin-top="0pt" fo:margin-bottom="0pt" fo:border="none"/>
      <style:text-properties/>
    </style:style>
    <style:style style:family="text" style:name="T755">
      <style:text-properties fo:color="#1f1f1f" fo:font-family="Arial" style:font-family-asian="Arial" style:font-family-complex="Arial" fo:font-size="12pt"/>
    </style:style>
    <style:style style:parent-style-name="141" style:family="paragraph" style:name="P30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56">
      <style:text-properties fo:color="#1f1f1f" fo:font-family="Arial" style:font-family-asian="Arial" style:font-family-complex="Arial" fo:font-size="14pt" fo:font-weight="bold"/>
    </style:style>
    <style:style style:parent-style-name="668" style:list-style-name="WWNum16" style:family="paragraph" style:name="P305">
      <style:paragraph-properties fo:line-height="115%" fo:margin-right="0cm" fo:margin-top="0pt" fo:margin-bottom="0pt" fo:border="none"/>
      <style:text-properties/>
    </style:style>
    <style:style style:family="text" style:name="T757">
      <style:text-properties fo:color="#1f1f1f" fo:font-family="Arial" style:font-family-asian="Arial" style:font-family-complex="Arial" fo:font-size="12pt"/>
    </style:style>
    <style:style style:parent-style-name="668" style:list-style-name="WWNum16" style:family="paragraph" style:name="P306">
      <style:paragraph-properties fo:line-height="115%" fo:margin-right="0cm" fo:margin-top="0pt" fo:margin-bottom="0pt" fo:border="none"/>
      <style:text-properties/>
    </style:style>
    <style:style style:family="text" style:name="T758">
      <style:text-properties fo:color="#1f1f1f" fo:font-family="Arial" style:font-family-asian="Arial" style:font-family-complex="Arial" fo:font-size="12pt"/>
    </style:style>
    <style:style style:parent-style-name="668" style:list-style-name="WWNum16" style:family="paragraph" style:name="P307">
      <style:paragraph-properties fo:line-height="115%" fo:margin-right="0cm" fo:margin-top="0pt" fo:margin-bottom="0pt" fo:border="none"/>
      <style:text-properties/>
    </style:style>
    <style:style style:family="text" style:name="T759">
      <style:text-properties fo:color="#1f1f1f" fo:font-family="Arial" style:font-family-asian="Arial" style:font-family-complex="Arial" fo:font-size="12pt"/>
    </style:style>
    <style:style style:parent-style-name="668" style:list-style-name="WWNum16" style:family="paragraph" style:name="P308">
      <style:paragraph-properties fo:line-height="115%" fo:margin-right="0cm" fo:margin-top="0pt" fo:margin-bottom="0pt" fo:border="none"/>
      <style:text-properties/>
    </style:style>
    <style:style style:family="text" style:name="T760">
      <style:text-properties fo:color="#1f1f1f" fo:font-family="Arial" style:font-family-asian="Arial" style:font-family-complex="Arial" fo:font-size="12pt"/>
    </style:style>
    <style:style style:family="paragraph" style:name="P309">
      <style:paragraph-properties/>
      <style:text-properties/>
    </style:style>
    <style:style style:family="paragraph" style:name="P310">
      <style:paragraph-properties fo:line-height="115%" fo:margin-left="0cm" fo:margin-right="0cm" fo:text-indent="0cm" fo:margin-top="0pt" fo:margin-bottom="0pt" fo:break-before="page" fo:border="none"/>
      <style:text-properties/>
    </style:style>
    <style:style style:family="text" style:name="T761">
      <style:text-properties fo:color="#1f1f1f" fo:font-family="Arial" style:font-family-asian="Arial" style:font-family-complex="Arial" fo:font-size="12pt"/>
    </style:style>
    <style:style style:parent-style-name="141" style:family="paragraph" style:name="P31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62">
      <style:text-properties fo:color="#1f1f1f" fo:font-family="Arial" style:font-family-asian="Arial" style:font-family-complex="Arial" fo:font-size="14pt" fo:font-weight="bold"/>
    </style:style>
    <style:style style:family="paragraph" style:name="P312">
      <style:paragraph-properties fo:line-height="115%" fo:margin-left="0cm" fo:margin-right="0cm" fo:text-indent="0cm" fo:margin-top="0pt" fo:margin-bottom="0pt" fo:border="none"/>
      <style:text-properties/>
    </style:style>
    <style:style style:family="text" style:name="T763">
      <style:text-properties fo:color="#1f1f1f" fo:font-family="Arial" style:font-family-asian="Arial" style:font-family-complex="Arial" fo:font-size="12pt"/>
    </style:style>
    <style:style style:parent-style-name="142" style:family="paragraph" style:name="P31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4">
      <style:text-properties fo:color="#1f1f1f" fo:font-family="Arial" style:font-family-asian="Arial" style:font-family-complex="Arial" fo:font-size="12pt" fo:font-weight="bold"/>
    </style:style>
    <style:style style:family="paragraph" style:name="P314">
      <style:paragraph-properties fo:line-height="115%" fo:margin-left="0cm" fo:margin-right="0cm" fo:text-indent="0cm" fo:margin-top="0pt" fo:margin-bottom="0pt" fo:border="none"/>
      <style:text-properties/>
    </style:style>
    <style:style style:family="text" style:name="T765">
      <style:text-properties fo:color="#1f1f1f" fo:font-family="Arial" style:font-family-asian="Arial" style:font-family-complex="Arial" fo:font-size="12pt"/>
    </style:style>
    <style:style style:family="text" style:name="T766">
      <style:text-properties fo:color="#1f1f1f" fo:font-family="Arial" style:font-family-asian="Arial" style:font-family-complex="Arial" fo:font-size="12pt"/>
    </style:style>
    <style:style style:parent-style-name="142" style:family="paragraph" style:name="P31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67">
      <style:text-properties fo:color="#1f1f1f" fo:font-family="Arial" style:font-family-asian="Arial" style:font-family-complex="Arial" fo:font-size="12pt" fo:font-weight="bold"/>
    </style:style>
    <style:style style:family="paragraph" style:name="P316">
      <style:paragraph-properties fo:line-height="115%" fo:margin-left="0cm" fo:margin-right="0cm" fo:text-indent="0cm" fo:margin-top="0pt" fo:margin-bottom="0pt" fo:border="none"/>
      <style:text-properties/>
    </style:style>
    <style:style style:family="text" style:name="T768">
      <style:text-properties fo:color="#1f1f1f" fo:font-family="Arial" style:font-family-asian="Arial" style:font-family-complex="Arial" fo:font-size="12pt"/>
    </style:style>
    <style:style style:family="text" style:name="T769">
      <style:text-properties fo:color="#1f1f1f" fo:font-family="Arial" style:font-family-asian="Arial" style:font-family-complex="Arial" fo:font-size="12pt"/>
    </style:style>
    <style:style style:parent-style-name="142" style:family="paragraph" style:name="P31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70">
      <style:text-properties fo:color="#1f1f1f" fo:font-family="Arial" style:font-family-asian="Arial" style:font-family-complex="Arial" fo:font-size="12pt" fo:font-weight="bold"/>
    </style:style>
    <style:style style:family="paragraph" style:name="P318">
      <style:paragraph-properties fo:line-height="115%" fo:margin-left="0cm" fo:margin-right="0cm" fo:text-indent="0cm" fo:margin-top="0pt" fo:margin-bottom="0pt" fo:border="none"/>
      <style:text-properties/>
    </style:style>
    <style:style style:family="text" style:name="T771">
      <style:text-properties fo:color="#1f1f1f" fo:font-family="Arial" style:font-family-asian="Arial" style:font-family-complex="Arial" fo:font-size="12pt"/>
    </style:style>
    <style:style style:family="text" style:name="T772">
      <style:text-properties fo:color="#1f1f1f" fo:font-family="Arial" style:font-family-asian="Arial" style:font-family-complex="Arial" fo:font-size="12pt"/>
    </style:style>
    <style:style style:parent-style-name="142" style:family="paragraph" style:name="P31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73">
      <style:text-properties fo:color="#1f1f1f" fo:font-family="Arial" style:font-family-asian="Arial" style:font-family-complex="Arial" fo:font-size="12pt" fo:font-weight="bold"/>
    </style:style>
    <style:style style:family="paragraph" style:name="P320">
      <style:paragraph-properties fo:line-height="115%" fo:margin-left="0cm" fo:margin-right="0cm" fo:text-indent="0cm" fo:margin-top="0pt" fo:margin-bottom="0pt" fo:border="none"/>
      <style:text-properties/>
    </style:style>
    <style:style style:family="text" style:name="T774">
      <style:text-properties fo:color="#1f1f1f" fo:font-family="Arial" style:font-family-asian="Arial" style:font-family-complex="Arial" fo:font-size="12pt"/>
    </style:style>
    <style:style style:family="text" style:name="T775">
      <style:text-properties fo:color="#1f1f1f" fo:font-family="Arial" style:font-family-asian="Arial" style:font-family-complex="Arial" fo:font-size="12pt"/>
    </style:style>
    <style:style style:parent-style-name="141" style:family="paragraph" style:name="P32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76">
      <style:text-properties fo:color="#1f1f1f" fo:font-family="Arial" style:font-family-asian="Arial" style:font-family-complex="Arial" fo:font-size="14pt" fo:font-weight="bold"/>
    </style:style>
    <style:style style:parent-style-name="668" style:list-style-name="WWNum17" style:family="paragraph" style:name="P322">
      <style:paragraph-properties fo:line-height="115%" fo:margin-right="0cm" fo:margin-top="0pt" fo:margin-bottom="0pt" fo:border="none"/>
      <style:text-properties/>
    </style:style>
    <style:style style:family="text" style:name="T777">
      <style:text-properties fo:color="#1f1f1f" fo:font-family="Arial" style:font-family-asian="Arial" style:font-family-complex="Arial" fo:font-size="12pt"/>
    </style:style>
    <style:style style:parent-style-name="668" style:list-style-name="WWNum17" style:family="paragraph" style:name="P323">
      <style:paragraph-properties fo:line-height="115%" fo:margin-right="0cm" fo:margin-top="0pt" fo:margin-bottom="0pt" fo:border="none"/>
      <style:text-properties/>
    </style:style>
    <style:style style:family="text" style:name="T778">
      <style:text-properties fo:color="#1f1f1f" fo:font-family="Arial" style:font-family-asian="Arial" style:font-family-complex="Arial" fo:font-size="12pt"/>
    </style:style>
    <style:style style:parent-style-name="668" style:list-style-name="WWNum17" style:family="paragraph" style:name="P324">
      <style:paragraph-properties fo:line-height="115%" fo:margin-right="0cm" fo:margin-top="0pt" fo:margin-bottom="0pt" fo:border="none"/>
      <style:text-properties/>
    </style:style>
    <style:style style:family="text" style:name="T779">
      <style:text-properties fo:color="#1f1f1f" fo:font-family="Arial" style:font-family-asian="Arial" style:font-family-complex="Arial" fo:font-size="12pt"/>
    </style:style>
    <style:style style:parent-style-name="668" style:list-style-name="WWNum17" style:family="paragraph" style:name="P325">
      <style:paragraph-properties fo:line-height="115%" fo:margin-right="0cm" fo:margin-top="0pt" fo:margin-bottom="0pt" fo:border="none"/>
      <style:text-properties/>
    </style:style>
    <style:style style:family="text" style:name="T780">
      <style:text-properties fo:color="#1f1f1f" fo:font-family="Arial" style:font-family-asian="Arial" style:font-family-complex="Arial" fo:font-size="12pt"/>
    </style:style>
    <style:style style:family="paragraph" style:name="P326">
      <style:paragraph-properties/>
      <style:text-properties/>
    </style:style>
    <style:style style:parent-style-name="141" style:family="paragraph" style:name="P32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781">
      <style:text-properties fo:color="#1f1f1f" fo:font-family="Arial" style:font-family-asian="Arial" style:font-family-complex="Arial" fo:font-size="14pt" fo:font-weight="bold"/>
    </style:style>
    <style:style style:family="paragraph" style:name="P328">
      <style:paragraph-properties fo:line-height="115%" fo:margin-left="0cm" fo:margin-right="0cm" fo:text-indent="0cm" fo:margin-top="0pt" fo:margin-bottom="0pt" fo:border="none"/>
      <style:text-properties/>
    </style:style>
    <style:style style:family="text" style:name="T782">
      <style:text-properties fo:color="#1f1f1f" fo:font-family="Arial" style:font-family-asian="Arial" style:font-family-complex="Arial" fo:font-size="12pt"/>
    </style:style>
    <style:style style:parent-style-name="142" style:family="paragraph" style:name="P32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83">
      <style:text-properties fo:color="#1f1f1f" fo:font-family="Arial" style:font-family-asian="Arial" style:font-family-complex="Arial" fo:font-size="12pt" fo:font-weight="bold"/>
    </style:style>
    <style:style style:family="paragraph" style:name="P330">
      <style:paragraph-properties fo:line-height="115%" fo:margin-left="0cm" fo:margin-right="0cm" fo:text-indent="0cm" fo:margin-top="0pt" fo:margin-bottom="0pt" fo:border="none"/>
      <style:text-properties/>
    </style:style>
    <style:style style:family="text" style:name="T784">
      <style:text-properties fo:color="#1f1f1f" fo:font-family="Arial" style:font-family-asian="Arial" style:font-family-complex="Arial" fo:font-size="12pt"/>
    </style:style>
    <style:style style:parent-style-name="142" style:family="paragraph" style:name="P33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85">
      <style:text-properties fo:color="#1f1f1f" fo:font-family="Arial" style:font-family-asian="Arial" style:font-family-complex="Arial" fo:font-size="12pt" fo:font-weight="bold"/>
    </style:style>
    <style:style style:family="paragraph" style:name="P332">
      <style:paragraph-properties fo:line-height="115%" fo:margin-left="0cm" fo:margin-right="0cm" fo:text-indent="0cm" fo:margin-top="0pt" fo:margin-bottom="0pt" fo:border="none"/>
      <style:text-properties/>
    </style:style>
    <style:style style:family="text" style:name="T786">
      <style:text-properties fo:color="#1f1f1f" fo:font-family="Arial" style:font-family-asian="Arial" style:font-family-complex="Arial" fo:font-size="12pt"/>
    </style:style>
    <style:style style:parent-style-name="142" style:family="paragraph" style:name="P33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87">
      <style:text-properties fo:color="#1f1f1f" fo:font-family="Arial" style:font-family-asian="Arial" style:font-family-complex="Arial" fo:font-size="12pt" fo:font-weight="bold"/>
    </style:style>
    <style:style style:family="paragraph" style:name="P334">
      <style:paragraph-properties fo:line-height="115%" fo:margin-left="0cm" fo:margin-right="0cm" fo:text-indent="0cm" fo:margin-top="0pt" fo:margin-bottom="0pt" fo:border="none"/>
      <style:text-properties/>
    </style:style>
    <style:style style:family="text" style:name="T788">
      <style:text-properties fo:color="#1f1f1f" fo:font-family="Arial" style:font-family-asian="Arial" style:font-family-complex="Arial" fo:font-size="12pt"/>
    </style:style>
    <style:style style:parent-style-name="141" style:family="paragraph" style:name="P33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89">
      <style:text-properties fo:color="#1f1f1f" fo:font-family="Arial" style:font-family-asian="Arial" style:font-family-complex="Arial" fo:font-size="14pt" fo:font-weight="bold"/>
    </style:style>
    <style:style style:parent-style-name="668" style:list-style-name="WWNum18" style:family="paragraph" style:name="P336">
      <style:paragraph-properties fo:line-height="115%" fo:margin-right="0cm" fo:margin-top="0pt" fo:margin-bottom="0pt" fo:border="none"/>
      <style:text-properties/>
    </style:style>
    <style:style style:family="text" style:name="T790">
      <style:text-properties fo:color="#1f1f1f" fo:font-family="Arial" style:font-family-asian="Arial" style:font-family-complex="Arial" fo:font-size="12pt"/>
    </style:style>
    <style:style style:parent-style-name="668" style:list-style-name="WWNum18" style:family="paragraph" style:name="P337">
      <style:paragraph-properties fo:line-height="115%" fo:margin-right="0cm" fo:margin-top="0pt" fo:margin-bottom="0pt" fo:border="none"/>
      <style:text-properties/>
    </style:style>
    <style:style style:family="text" style:name="T791">
      <style:text-properties fo:color="#1f1f1f" fo:font-family="Arial" style:font-family-asian="Arial" style:font-family-complex="Arial" fo:font-size="12pt"/>
    </style:style>
    <style:style style:parent-style-name="668" style:list-style-name="WWNum18" style:family="paragraph" style:name="P338">
      <style:paragraph-properties fo:line-height="115%" fo:margin-right="0cm" fo:margin-top="0pt" fo:margin-bottom="0pt" fo:border="none"/>
      <style:text-properties/>
    </style:style>
    <style:style style:family="text" style:name="T792">
      <style:text-properties fo:color="#1f1f1f" fo:font-family="Arial" style:font-family-asian="Arial" style:font-family-complex="Arial" fo:font-size="12pt"/>
    </style:style>
    <style:style style:parent-style-name="668" style:list-style-name="WWNum18" style:family="paragraph" style:name="P339">
      <style:paragraph-properties fo:line-height="115%" fo:margin-right="0cm" fo:margin-top="0pt" fo:margin-bottom="0pt" fo:border="none"/>
      <style:text-properties/>
    </style:style>
    <style:style style:family="text" style:name="T793">
      <style:text-properties fo:color="#1f1f1f" fo:font-family="Arial" style:font-family-asian="Arial" style:font-family-complex="Arial" fo:font-size="12pt"/>
    </style:style>
    <style:style style:family="paragraph" style:name="P340">
      <style:paragraph-properties/>
      <style:text-properties/>
    </style:style>
    <style:style style:family="paragraph" style:name="P341">
      <style:paragraph-properties fo:line-height="115%" fo:margin-left="0cm" fo:margin-right="0cm" fo:text-indent="0cm" fo:margin-top="0pt" fo:margin-bottom="0pt" fo:break-before="page" fo:border="none"/>
      <style:text-properties/>
    </style:style>
    <style:style style:family="text" style:name="T794">
      <style:text-properties fo:color="#1f1f1f" fo:font-family="Arial" style:font-family-asian="Arial" style:font-family-complex="Arial" fo:font-size="12pt"/>
    </style:style>
    <style:style style:parent-style-name="141" style:family="paragraph" style:name="P34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795">
      <style:text-properties fo:color="#1f1f1f" fo:font-family="Arial" style:font-family-asian="Arial" style:font-family-complex="Arial" fo:font-size="14pt" fo:font-weight="bold"/>
    </style:style>
    <style:style style:family="paragraph" style:name="P343">
      <style:paragraph-properties fo:line-height="115%" fo:margin-left="0cm" fo:margin-right="0cm" fo:text-indent="0cm" fo:margin-top="0pt" fo:margin-bottom="0pt" fo:border="none"/>
      <style:text-properties/>
    </style:style>
    <style:style style:family="text" style:name="T796">
      <style:text-properties fo:color="#1f1f1f" fo:font-family="Arial" style:font-family-asian="Arial" style:font-family-complex="Arial" fo:font-size="12pt"/>
    </style:style>
    <style:style style:parent-style-name="142" style:family="paragraph" style:name="P34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97">
      <style:text-properties fo:color="#1f1f1f" fo:font-family="Arial" style:font-family-asian="Arial" style:font-family-complex="Arial" fo:font-size="12pt" fo:font-weight="bold"/>
    </style:style>
    <style:style style:family="paragraph" style:name="P345">
      <style:paragraph-properties fo:line-height="115%" fo:margin-left="0cm" fo:margin-right="0cm" fo:text-indent="0cm" fo:margin-top="0pt" fo:margin-bottom="0pt" fo:border="none"/>
      <style:text-properties/>
    </style:style>
    <style:style style:family="text" style:name="T798">
      <style:text-properties fo:color="#1f1f1f" fo:font-family="Arial" style:font-family-asian="Arial" style:font-family-complex="Arial" fo:font-size="12pt"/>
    </style:style>
    <style:style style:parent-style-name="142" style:family="paragraph" style:name="P34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799">
      <style:text-properties fo:color="#1f1f1f" fo:font-family="Arial" style:font-family-asian="Arial" style:font-family-complex="Arial" fo:font-size="12pt" fo:font-weight="bold"/>
    </style:style>
    <style:style style:family="paragraph" style:name="P347">
      <style:paragraph-properties fo:line-height="115%" fo:margin-left="0cm" fo:margin-right="0cm" fo:text-indent="0cm" fo:margin-top="0pt" fo:margin-bottom="0pt" fo:border="none"/>
      <style:text-properties/>
    </style:style>
    <style:style style:family="text" style:name="T800">
      <style:text-properties fo:color="#1f1f1f" fo:font-family="Arial" style:font-family-asian="Arial" style:font-family-complex="Arial" fo:font-size="12pt"/>
    </style:style>
    <style:style style:parent-style-name="142" style:family="paragraph" style:name="P34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1">
      <style:text-properties fo:color="#1f1f1f" fo:font-family="Arial" style:font-family-asian="Arial" style:font-family-complex="Arial" fo:font-size="12pt" fo:font-weight="bold"/>
    </style:style>
    <style:style style:family="paragraph" style:name="P349">
      <style:paragraph-properties fo:line-height="115%" fo:margin-left="0cm" fo:margin-right="0cm" fo:text-indent="0cm" fo:margin-top="0pt" fo:margin-bottom="0pt" fo:border="none"/>
      <style:text-properties/>
    </style:style>
    <style:style style:family="text" style:name="T802">
      <style:text-properties fo:color="#1f1f1f" fo:font-family="Arial" style:font-family-asian="Arial" style:font-family-complex="Arial" fo:font-size="12pt"/>
    </style:style>
    <style:style style:parent-style-name="142" style:family="paragraph" style:name="P3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03">
      <style:text-properties fo:color="#1f1f1f" fo:font-family="Arial" style:font-family-asian="Arial" style:font-family-complex="Arial" fo:font-size="12pt" fo:font-weight="bold"/>
    </style:style>
    <style:style style:family="paragraph" style:name="P351">
      <style:paragraph-properties fo:line-height="115%" fo:margin-left="0cm" fo:margin-right="0cm" fo:text-indent="0cm" fo:margin-top="0pt" fo:margin-bottom="0pt" fo:border="none"/>
      <style:text-properties/>
    </style:style>
    <style:style style:family="text" style:name="T804">
      <style:text-properties fo:color="#1f1f1f" fo:font-family="Arial" style:font-family-asian="Arial" style:font-family-complex="Arial" fo:font-size="12pt"/>
    </style:style>
    <style:style style:family="text" style:name="T805">
      <style:text-properties fo:color="#1f1f1f" fo:font-family="Arial" style:font-family-asian="Arial" style:font-family-complex="Arial" fo:font-size="12pt"/>
    </style:style>
    <style:style style:parent-style-name="141" style:family="paragraph" style:name="P35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06">
      <style:text-properties fo:color="#1f1f1f" fo:font-family="Arial" style:font-family-asian="Arial" style:font-family-complex="Arial" fo:font-size="14pt" fo:font-weight="bold"/>
    </style:style>
    <style:style style:parent-style-name="668" style:list-style-name="WWNum19" style:family="paragraph" style:name="P353">
      <style:paragraph-properties fo:line-height="115%" fo:margin-right="0cm" fo:margin-top="0pt" fo:margin-bottom="0pt" fo:border="none"/>
      <style:text-properties/>
    </style:style>
    <style:style style:family="text" style:name="T807">
      <style:text-properties fo:color="#1f1f1f" fo:font-family="Arial" style:font-family-asian="Arial" style:font-family-complex="Arial" fo:font-size="12pt"/>
    </style:style>
    <style:style style:parent-style-name="668" style:list-style-name="WWNum19" style:family="paragraph" style:name="P354">
      <style:paragraph-properties fo:line-height="115%" fo:margin-right="0cm" fo:margin-top="0pt" fo:margin-bottom="0pt" fo:border="none"/>
      <style:text-properties/>
    </style:style>
    <style:style style:family="text" style:name="T808">
      <style:text-properties fo:color="#1f1f1f" fo:font-family="Arial" style:font-family-asian="Arial" style:font-family-complex="Arial" fo:font-size="12pt"/>
    </style:style>
    <style:style style:parent-style-name="668" style:list-style-name="WWNum19" style:family="paragraph" style:name="P355">
      <style:paragraph-properties fo:line-height="115%" fo:margin-right="0cm" fo:margin-top="0pt" fo:margin-bottom="0pt" fo:border="none"/>
      <style:text-properties/>
    </style:style>
    <style:style style:family="text" style:name="T809">
      <style:text-properties fo:color="#1f1f1f" fo:font-family="Arial" style:font-family-asian="Arial" style:font-family-complex="Arial" fo:font-size="12pt"/>
    </style:style>
    <style:style style:parent-style-name="668" style:list-style-name="WWNum19" style:family="paragraph" style:name="P356">
      <style:paragraph-properties fo:line-height="115%" fo:margin-right="0cm" fo:margin-top="0pt" fo:margin-bottom="0pt" fo:border="none"/>
      <style:text-properties/>
    </style:style>
    <style:style style:family="text" style:name="T810">
      <style:text-properties fo:color="#1f1f1f" fo:font-family="Arial" style:font-family-asian="Arial" style:font-family-complex="Arial" fo:font-size="12pt"/>
    </style:style>
    <style:style style:family="paragraph" style:name="P357">
      <style:paragraph-properties/>
      <style:text-properties/>
    </style:style>
    <style:style style:family="paragraph" style:name="P358">
      <style:paragraph-properties fo:line-height="115%" fo:margin-left="0cm" fo:margin-right="0cm" fo:text-indent="0cm" fo:margin-top="0pt" fo:margin-bottom="0pt" fo:break-before="page" fo:border="none"/>
      <style:text-properties/>
    </style:style>
    <style:style style:family="text" style:name="T811">
      <style:text-properties fo:color="#1f1f1f" fo:font-family="Arial" style:font-family-asian="Arial" style:font-family-complex="Arial" fo:font-size="12pt"/>
    </style:style>
    <style:style style:parent-style-name="141" style:family="paragraph" style:name="P35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12">
      <style:text-properties fo:color="#1f1f1f" fo:font-family="Arial" style:font-family-asian="Arial" style:font-family-complex="Arial" fo:font-size="14pt" fo:font-weight="bold"/>
    </style:style>
    <style:style style:family="paragraph" style:name="P360">
      <style:paragraph-properties fo:line-height="115%" fo:margin-left="0cm" fo:margin-right="0cm" fo:text-indent="0cm" fo:margin-top="0pt" fo:margin-bottom="0pt" fo:border="none"/>
      <style:text-properties/>
    </style:style>
    <style:style style:family="text" style:name="T813">
      <style:text-properties fo:color="#1f1f1f" fo:font-family="Arial" style:font-family-asian="Arial" style:font-family-complex="Arial" fo:font-size="12pt"/>
    </style:style>
    <style:style style:parent-style-name="142" style:family="paragraph" style:name="P36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14">
      <style:text-properties fo:color="#1f1f1f" fo:font-family="Arial" style:font-family-asian="Arial" style:font-family-complex="Arial" fo:font-size="12pt" fo:font-weight="bold"/>
    </style:style>
    <style:style style:family="paragraph" style:name="P362">
      <style:paragraph-properties fo:line-height="115%" fo:margin-left="0cm" fo:margin-right="0cm" fo:text-indent="0cm" fo:margin-top="0pt" fo:margin-bottom="0pt" fo:border="none"/>
      <style:text-properties/>
    </style:style>
    <style:style style:family="text" style:name="T815">
      <style:text-properties fo:color="#1f1f1f" fo:font-family="Arial" style:font-family-asian="Arial" style:font-family-complex="Arial" fo:font-size="12pt"/>
    </style:style>
    <style:style style:parent-style-name="142" style:family="paragraph" style:name="P36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16">
      <style:text-properties fo:color="#1f1f1f" fo:font-family="Arial" style:font-family-asian="Arial" style:font-family-complex="Arial" fo:font-size="12pt" fo:font-weight="bold"/>
    </style:style>
    <style:style style:family="paragraph" style:name="P364">
      <style:paragraph-properties fo:line-height="115%" fo:margin-left="0cm" fo:margin-right="0cm" fo:text-indent="0cm" fo:margin-top="0pt" fo:margin-bottom="0pt" fo:border="none"/>
      <style:text-properties/>
    </style:style>
    <style:style style:family="text" style:name="T817">
      <style:text-properties fo:color="#1f1f1f" fo:font-family="Arial" style:font-family-asian="Arial" style:font-family-complex="Arial" fo:font-size="12pt"/>
    </style:style>
    <style:style style:parent-style-name="142" style:family="paragraph" style:name="P36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18">
      <style:text-properties fo:color="#1f1f1f" fo:font-family="Arial" style:font-family-asian="Arial" style:font-family-complex="Arial" fo:font-size="12pt" fo:font-weight="bold"/>
    </style:style>
    <style:style style:family="paragraph" style:name="P366">
      <style:paragraph-properties fo:line-height="115%" fo:margin-left="0cm" fo:margin-right="0cm" fo:text-indent="0cm" fo:margin-top="0pt" fo:margin-bottom="0pt" fo:border="none"/>
      <style:text-properties/>
    </style:style>
    <style:style style:family="text" style:name="T819">
      <style:text-properties fo:color="#1f1f1f" fo:font-family="Arial" style:font-family-asian="Arial" style:font-family-complex="Arial" fo:font-size="12pt"/>
    </style:style>
    <style:style style:parent-style-name="142" style:family="paragraph" style:name="P36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20">
      <style:text-properties fo:color="#1f1f1f" fo:font-family="Arial" style:font-family-asian="Arial" style:font-family-complex="Arial" fo:font-size="12pt" fo:font-weight="bold"/>
    </style:style>
    <style:style style:family="paragraph" style:name="P368">
      <style:paragraph-properties fo:line-height="115%" fo:margin-left="0cm" fo:margin-right="0cm" fo:text-indent="0cm" fo:margin-top="0pt" fo:margin-bottom="0pt" fo:border="none"/>
      <style:text-properties/>
    </style:style>
    <style:style style:family="text" style:name="T821">
      <style:text-properties fo:color="#1f1f1f" fo:font-family="Arial" style:font-family-asian="Arial" style:font-family-complex="Arial" fo:font-size="12pt"/>
    </style:style>
    <style:style style:parent-style-name="141" style:family="paragraph" style:name="P36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22">
      <style:text-properties fo:color="#1f1f1f" fo:font-family="Arial" style:font-family-asian="Arial" style:font-family-complex="Arial" fo:font-size="14pt" fo:font-weight="bold"/>
    </style:style>
    <style:style style:parent-style-name="668" style:list-style-name="WWNum20" style:family="paragraph" style:name="P370">
      <style:paragraph-properties fo:line-height="115%" fo:margin-right="0cm" fo:margin-top="0pt" fo:margin-bottom="0pt" fo:border="none"/>
      <style:text-properties/>
    </style:style>
    <style:style style:family="text" style:name="T823">
      <style:text-properties fo:color="#1f1f1f" fo:font-family="Arial" style:font-family-asian="Arial" style:font-family-complex="Arial" fo:font-size="12pt"/>
    </style:style>
    <style:style style:parent-style-name="668" style:list-style-name="WWNum20" style:family="paragraph" style:name="P371">
      <style:paragraph-properties fo:line-height="115%" fo:margin-right="0cm" fo:margin-top="0pt" fo:margin-bottom="0pt" fo:border="none"/>
      <style:text-properties/>
    </style:style>
    <style:style style:family="text" style:name="T824">
      <style:text-properties fo:color="#1f1f1f" fo:font-family="Arial" style:font-family-asian="Arial" style:font-family-complex="Arial" fo:font-size="12pt"/>
    </style:style>
    <style:style style:parent-style-name="668" style:list-style-name="WWNum20" style:family="paragraph" style:name="P372">
      <style:paragraph-properties fo:line-height="115%" fo:margin-right="0cm" fo:margin-top="0pt" fo:margin-bottom="0pt" fo:border="none"/>
      <style:text-properties/>
    </style:style>
    <style:style style:family="text" style:name="T825">
      <style:text-properties fo:color="#1f1f1f" fo:font-family="Arial" style:font-family-asian="Arial" style:font-family-complex="Arial" fo:font-size="12pt"/>
    </style:style>
    <style:style style:parent-style-name="668" style:list-style-name="WWNum20" style:family="paragraph" style:name="P373">
      <style:paragraph-properties fo:line-height="115%" fo:margin-right="0cm" fo:margin-top="0pt" fo:margin-bottom="0pt" fo:border="none"/>
      <style:text-properties/>
    </style:style>
    <style:style style:family="text" style:name="T826">
      <style:text-properties fo:color="#1f1f1f" fo:font-family="Arial" style:font-family-asian="Arial" style:font-family-complex="Arial" fo:font-size="12pt"/>
    </style:style>
    <style:style style:family="paragraph" style:name="P374">
      <style:paragraph-properties/>
      <style:text-properties/>
    </style:style>
    <style:style style:family="paragraph" style:name="P375">
      <style:paragraph-properties fo:line-height="115%" fo:margin-left="0cm" fo:margin-right="0cm" fo:text-indent="0cm" fo:margin-top="0pt" fo:margin-bottom="0pt" fo:break-before="page" fo:border="none"/>
      <style:text-properties/>
    </style:style>
    <style:style style:family="text" style:name="T827">
      <style:text-properties fo:color="#1f1f1f" fo:font-family="Arial" style:font-family-asian="Arial" style:font-family-complex="Arial" fo:font-size="12pt"/>
    </style:style>
    <style:style style:parent-style-name="141" style:family="paragraph" style:name="P37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28">
      <style:text-properties fo:color="#1f1f1f" fo:font-family="Arial" style:font-family-asian="Arial" style:font-family-complex="Arial" fo:font-size="14pt" fo:font-weight="bold"/>
    </style:style>
    <style:style style:family="paragraph" style:name="P377">
      <style:paragraph-properties fo:line-height="115%" fo:margin-left="0cm" fo:margin-right="0cm" fo:text-indent="0cm" fo:margin-top="0pt" fo:margin-bottom="0pt" fo:border="none"/>
      <style:text-properties/>
    </style:style>
    <style:style style:family="text" style:name="T829">
      <style:text-properties fo:color="#1f1f1f" fo:font-family="Arial" style:font-family-asian="Arial" style:font-family-complex="Arial" fo:font-size="12pt"/>
    </style:style>
    <style:style style:family="paragraph" style:name="P378">
      <style:paragraph-properties fo:line-height="115%" fo:margin-left="0cm" fo:margin-right="0cm" fo:text-indent="0cm" fo:margin-top="0pt" fo:margin-bottom="0pt" fo:border="none"/>
      <style:text-properties/>
    </style:style>
    <style:style style:family="text" style:name="T830">
      <style:text-properties fo:color="#1f1f1f" fo:font-family="Arial" style:font-family-asian="Arial" style:font-family-complex="Arial" fo:font-size="12pt"/>
    </style:style>
    <style:style style:family="paragraph" style:name="P379">
      <style:paragraph-properties fo:line-height="115%" fo:margin-left="0cm" fo:margin-right="0cm" fo:text-indent="0cm" fo:margin-top="0pt" fo:margin-bottom="0pt" fo:border="none"/>
      <style:text-properties/>
    </style:style>
    <style:style style:family="text" style:name="T831">
      <style:text-properties fo:color="#1f1f1f" fo:font-family="Arial" style:font-family-asian="Arial" style:font-family-complex="Arial" fo:font-size="12pt"/>
    </style:style>
    <style:style style:family="paragraph" style:name="P380">
      <style:paragraph-properties fo:line-height="115%" fo:margin-left="0cm" fo:margin-right="0cm" fo:text-indent="0cm" fo:margin-top="0pt" fo:margin-bottom="0pt" fo:border="none"/>
      <style:text-properties/>
    </style:style>
    <style:style style:family="text" style:name="T832">
      <style:text-properties fo:color="#1f1f1f" fo:font-family="Arial" style:font-family-asian="Arial" style:font-family-complex="Arial" fo:font-size="12pt"/>
    </style:style>
    <style:style style:family="paragraph" style:name="P381">
      <style:paragraph-properties fo:line-height="115%" fo:margin-left="0cm" fo:margin-right="0cm" fo:text-indent="0cm" fo:margin-top="0pt" fo:margin-bottom="0pt" fo:border="none"/>
      <style:text-properties/>
    </style:style>
    <style:style style:family="text" style:name="T833">
      <style:text-properties fo:color="#1f1f1f" fo:font-family="Arial" style:font-family-asian="Arial" style:font-family-complex="Arial" fo:font-size="12pt"/>
    </style:style>
    <style:style style:parent-style-name="141" style:family="paragraph" style:name="P38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34">
      <style:text-properties fo:color="#1f1f1f" fo:font-family="Arial" style:font-family-asian="Arial" style:font-family-complex="Arial" fo:font-size="14pt" fo:font-weight="bold"/>
    </style:style>
    <style:style style:parent-style-name="668" style:list-style-name="WWNum21" style:family="paragraph" style:name="P383">
      <style:paragraph-properties fo:line-height="115%" fo:margin-right="0cm" fo:margin-top="0pt" fo:margin-bottom="0pt" fo:border="none"/>
      <style:text-properties/>
    </style:style>
    <style:style style:family="text" style:name="T835">
      <style:text-properties fo:color="#1f1f1f" fo:font-family="Arial" style:font-family-asian="Arial" style:font-family-complex="Arial" fo:font-size="12pt"/>
    </style:style>
    <style:style style:parent-style-name="668" style:list-style-name="WWNum21" style:family="paragraph" style:name="P384">
      <style:paragraph-properties fo:line-height="115%" fo:margin-right="0cm" fo:margin-top="0pt" fo:margin-bottom="0pt" fo:border="none"/>
      <style:text-properties/>
    </style:style>
    <style:style style:family="text" style:name="T836">
      <style:text-properties fo:color="#1f1f1f" fo:font-family="Arial" style:font-family-asian="Arial" style:font-family-complex="Arial" fo:font-size="12pt"/>
    </style:style>
    <style:style style:parent-style-name="668" style:list-style-name="WWNum21" style:family="paragraph" style:name="P385">
      <style:paragraph-properties fo:line-height="115%" fo:margin-right="0cm" fo:margin-top="0pt" fo:margin-bottom="0pt" fo:border="none"/>
      <style:text-properties/>
    </style:style>
    <style:style style:family="text" style:name="T837">
      <style:text-properties fo:color="#1f1f1f" fo:font-family="Arial" style:font-family-asian="Arial" style:font-family-complex="Arial" fo:font-size="12pt"/>
    </style:style>
    <style:style style:parent-style-name="668" style:list-style-name="WWNum21" style:family="paragraph" style:name="P386">
      <style:paragraph-properties fo:line-height="115%" fo:margin-right="0cm" fo:margin-top="0pt" fo:margin-bottom="0pt" fo:border="none"/>
      <style:text-properties/>
    </style:style>
    <style:style style:family="text" style:name="T838">
      <style:text-properties fo:color="#1f1f1f" fo:font-family="Arial" style:font-family-asian="Arial" style:font-family-complex="Arial" fo:font-size="12pt"/>
    </style:style>
    <style:style style:family="paragraph" style:name="P387">
      <style:paragraph-properties/>
      <style:text-properties/>
    </style:style>
    <style:style style:family="paragraph" style:name="P388">
      <style:paragraph-properties fo:line-height="115%" fo:margin-left="0cm" fo:margin-right="0cm" fo:text-indent="0cm" fo:margin-top="0pt" fo:margin-bottom="0pt" fo:break-before="page" fo:border="none"/>
      <style:text-properties/>
    </style:style>
    <style:style style:family="text" style:name="T839">
      <style:text-properties fo:color="#1f1f1f" fo:font-family="Arial" style:font-family-asian="Arial" style:font-family-complex="Arial" fo:font-size="12pt"/>
    </style:style>
    <style:style style:parent-style-name="141" style:family="paragraph" style:name="P38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40">
      <style:text-properties fo:color="#1f1f1f" fo:font-family="Arial" style:font-family-asian="Arial" style:font-family-complex="Arial" fo:font-size="14pt" fo:font-weight="bold"/>
    </style:style>
    <style:style style:family="paragraph" style:name="P390">
      <style:paragraph-properties fo:line-height="115%" fo:margin-left="0cm" fo:margin-right="0cm" fo:text-indent="0cm" fo:margin-top="0pt" fo:margin-bottom="0pt" fo:border="none"/>
      <style:text-properties/>
    </style:style>
    <style:style style:family="text" style:name="T841">
      <style:text-properties fo:color="#1f1f1f" fo:font-family="Arial" style:font-family-asian="Arial" style:font-family-complex="Arial" fo:font-size="12pt"/>
    </style:style>
    <style:style style:parent-style-name="142" style:family="paragraph" style:name="P39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2">
      <style:text-properties fo:color="#1f1f1f" fo:font-family="Arial" style:font-family-asian="Arial" style:font-family-complex="Arial" fo:font-size="12pt" fo:font-weight="bold"/>
    </style:style>
    <style:style style:family="paragraph" style:name="P392">
      <style:paragraph-properties fo:line-height="115%" fo:margin-left="0cm" fo:margin-right="0cm" fo:text-indent="0cm" fo:margin-top="0pt" fo:margin-bottom="0pt" fo:border="none"/>
      <style:text-properties/>
    </style:style>
    <style:style style:family="text" style:name="T843">
      <style:text-properties fo:color="#1f1f1f" fo:font-family="Arial" style:font-family-asian="Arial" style:font-family-complex="Arial" fo:font-size="12pt"/>
    </style:style>
    <style:style style:parent-style-name="142" style:family="paragraph" style:name="P39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4">
      <style:text-properties fo:color="#1f1f1f" fo:font-family="Arial" style:font-family-asian="Arial" style:font-family-complex="Arial" fo:font-size="12pt" fo:font-weight="bold"/>
    </style:style>
    <style:style style:family="paragraph" style:name="P394">
      <style:paragraph-properties fo:line-height="115%" fo:margin-left="0cm" fo:margin-right="0cm" fo:text-indent="0cm" fo:margin-top="0pt" fo:margin-bottom="0pt" fo:border="none"/>
      <style:text-properties/>
    </style:style>
    <style:style style:family="text" style:name="T845">
      <style:text-properties fo:color="#1f1f1f" fo:font-family="Arial" style:font-family-asian="Arial" style:font-family-complex="Arial" fo:font-size="12pt"/>
    </style:style>
    <style:style style:parent-style-name="142" style:family="paragraph" style:name="P39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6">
      <style:text-properties fo:color="#1f1f1f" fo:font-family="Arial" style:font-family-asian="Arial" style:font-family-complex="Arial" fo:font-size="12pt" fo:font-weight="bold"/>
    </style:style>
    <style:style style:family="paragraph" style:name="P396">
      <style:paragraph-properties fo:line-height="115%" fo:margin-left="0cm" fo:margin-right="0cm" fo:text-indent="0cm" fo:margin-top="0pt" fo:margin-bottom="0pt" fo:border="none"/>
      <style:text-properties/>
    </style:style>
    <style:style style:family="text" style:name="T847">
      <style:text-properties fo:color="#1f1f1f" fo:font-family="Arial" style:font-family-asian="Arial" style:font-family-complex="Arial" fo:font-size="12pt"/>
    </style:style>
    <style:style style:parent-style-name="142" style:family="paragraph" style:name="P39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48">
      <style:text-properties fo:color="#1f1f1f" fo:font-family="Arial" style:font-family-asian="Arial" style:font-family-complex="Arial" fo:font-size="12pt" fo:font-weight="bold"/>
    </style:style>
    <style:style style:family="paragraph" style:name="P398">
      <style:paragraph-properties fo:line-height="115%" fo:margin-left="0cm" fo:margin-right="0cm" fo:text-indent="0cm" fo:margin-top="0pt" fo:margin-bottom="0pt" fo:border="none"/>
      <style:text-properties/>
    </style:style>
    <style:style style:family="text" style:name="T849">
      <style:text-properties fo:color="#1f1f1f" fo:font-family="Arial" style:font-family-asian="Arial" style:font-family-complex="Arial" fo:font-size="12pt"/>
    </style:style>
    <style:style style:parent-style-name="141" style:family="paragraph" style:name="P39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50">
      <style:text-properties fo:color="#1f1f1f" fo:font-family="Arial" style:font-family-asian="Arial" style:font-family-complex="Arial" fo:font-size="14pt" fo:font-weight="bold"/>
    </style:style>
    <style:style style:parent-style-name="668" style:list-style-name="WWNum22" style:family="paragraph" style:name="P400">
      <style:paragraph-properties fo:line-height="115%" fo:margin-right="0cm" fo:margin-top="0pt" fo:margin-bottom="0pt" fo:border="none"/>
      <style:text-properties/>
    </style:style>
    <style:style style:family="text" style:name="T851">
      <style:text-properties fo:color="#1f1f1f" fo:font-family="Arial" style:font-family-asian="Arial" style:font-family-complex="Arial" fo:font-size="12pt"/>
    </style:style>
    <style:style style:parent-style-name="668" style:list-style-name="WWNum22" style:family="paragraph" style:name="P401">
      <style:paragraph-properties fo:line-height="115%" fo:margin-right="0cm" fo:margin-top="0pt" fo:margin-bottom="0pt" fo:border="none"/>
      <style:text-properties/>
    </style:style>
    <style:style style:family="text" style:name="T852">
      <style:text-properties fo:color="#1f1f1f" fo:font-family="Arial" style:font-family-asian="Arial" style:font-family-complex="Arial" fo:font-size="12pt"/>
    </style:style>
    <style:style style:family="text" style:name="T853">
      <style:text-properties fo:font-family="Arial" style:font-family-asian="Arial" style:font-family-complex="Arial" fo:font-size="12pt"/>
    </style:style>
    <style:style style:family="paragraph" style:name="P402">
      <style:paragraph-properties/>
      <style:text-properties fo:font-family="Arial" style:font-family-asian="Arial" style:font-family-complex="Arial" fo:font-size="12pt" style:font-size-complex="12pt"/>
    </style:style>
    <style:style style:family="text" style:name="T854">
      <style:text-properties fo:font-family="Arial" style:font-family-asian="Arial" style:font-family-complex="Arial" fo:font-size="12pt" style:font-size-complex="12pt"/>
    </style:style>
    <style:style style:family="text" style:name="T855">
      <style:text-properties fo:font-family="Arial" style:font-family-asian="Arial" style:font-family-complex="Arial" fo:font-size="12pt" style:font-size-complex="12pt"/>
    </style:style>
    <style:style style:family="text" style:name="T856">
      <style:text-properties fo:font-family="Arial" style:font-family-asian="Arial" style:font-family-complex="Arial" fo:font-size="12pt" style:font-size-complex="12pt"/>
    </style:style>
    <style:style style:parent-style-name="141" style:family="paragraph" style:name="P40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857">
      <style:text-properties fo:color="#1f1f1f" fo:font-family="Arial" style:font-family-asian="Arial" style:font-family-complex="Arial" fo:font-size="14pt" fo:font-weight="bold"/>
    </style:style>
    <style:style style:family="paragraph" style:name="P404">
      <style:paragraph-properties fo:line-height="115%" fo:margin-left="0cm" fo:margin-right="0cm" fo:text-indent="0cm" fo:margin-top="0pt" fo:margin-bottom="0pt" fo:border="none"/>
      <style:text-properties/>
    </style:style>
    <style:style style:family="text" style:name="T858">
      <style:text-properties fo:color="#1f1f1f" fo:font-family="Arial" style:font-family-asian="Arial" style:font-family-complex="Arial" fo:font-size="12pt"/>
    </style:style>
    <style:style style:family="paragraph" style:name="P405">
      <style:paragraph-properties fo:line-height="115%" fo:margin-left="0cm" fo:margin-right="0cm" fo:text-indent="0cm" fo:margin-top="0pt" fo:margin-bottom="0pt" fo:border="none"/>
      <style:text-properties/>
    </style:style>
    <style:style style:family="text" style:name="T859">
      <style:text-properties fo:color="#1f1f1f" fo:font-family="Arial" style:font-family-asian="Arial" style:font-family-complex="Arial" fo:font-size="12pt"/>
    </style:style>
    <style:style style:family="paragraph" style:name="P406">
      <style:paragraph-properties fo:line-height="115%" fo:margin-left="0cm" fo:margin-right="0cm" fo:text-indent="0cm" fo:margin-top="0pt" fo:margin-bottom="0pt" fo:border="none"/>
      <style:text-properties/>
    </style:style>
    <style:style style:family="text" style:name="T860">
      <style:text-properties fo:color="#1f1f1f" fo:font-family="Arial" style:font-family-asian="Arial" style:font-family-complex="Arial" fo:font-size="12pt"/>
    </style:style>
    <style:style style:family="paragraph" style:name="P407">
      <style:paragraph-properties fo:line-height="115%" fo:margin-left="0cm" fo:margin-right="0cm" fo:text-indent="0cm" fo:margin-top="0pt" fo:margin-bottom="0pt" fo:border="none"/>
      <style:text-properties/>
    </style:style>
    <style:style style:family="text" style:name="T861">
      <style:text-properties fo:color="#1f1f1f" fo:font-family="Arial" style:font-family-asian="Arial" style:font-family-complex="Arial" fo:font-size="12pt"/>
    </style:style>
    <style:style style:family="text" style:name="T862">
      <style:text-properties fo:color="#1f1f1f" fo:font-family="Arial" style:font-family-asian="Arial" style:font-family-complex="Arial" fo:font-size="12pt"/>
    </style:style>
    <style:style style:family="paragraph" style:name="P408">
      <style:paragraph-properties fo:line-height="115%" fo:margin-left="0cm" fo:margin-right="0cm" fo:text-indent="0cm" fo:margin-top="0pt" fo:margin-bottom="0pt" fo:border="none"/>
      <style:text-properties/>
    </style:style>
    <style:style style:family="text" style:name="T863">
      <style:text-properties fo:color="#1f1f1f" fo:font-family="Arial" style:font-family-asian="Arial" style:font-family-complex="Arial" fo:font-size="12pt"/>
    </style:style>
    <style:style style:parent-style-name="141" style:family="paragraph" style:name="P40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64">
      <style:text-properties fo:color="#1f1f1f" fo:font-family="Arial" style:font-family-asian="Arial" style:font-family-complex="Arial" fo:font-size="14pt" fo:font-weight="bold"/>
    </style:style>
    <style:style style:parent-style-name="668" style:list-style-name="WWNum23" style:family="paragraph" style:name="P410">
      <style:paragraph-properties fo:line-height="115%" fo:margin-right="0cm" fo:margin-top="0pt" fo:margin-bottom="0pt" fo:border="none"/>
      <style:text-properties/>
    </style:style>
    <style:style style:family="text" style:name="T865">
      <style:text-properties fo:color="#1f1f1f" fo:font-family="Arial" style:font-family-asian="Arial" style:font-family-complex="Arial" fo:font-size="12pt"/>
    </style:style>
    <style:style style:parent-style-name="668" style:list-style-name="WWNum23" style:family="paragraph" style:name="P411">
      <style:paragraph-properties fo:line-height="115%" fo:margin-right="0cm" fo:margin-top="0pt" fo:margin-bottom="0pt" fo:border="none"/>
      <style:text-properties/>
    </style:style>
    <style:style style:family="text" style:name="T866">
      <style:text-properties fo:color="#1f1f1f" fo:font-family="Arial" style:font-family-asian="Arial" style:font-family-complex="Arial" fo:font-size="12pt"/>
    </style:style>
    <style:style style:parent-style-name="668" style:list-style-name="WWNum23" style:family="paragraph" style:name="P412">
      <style:paragraph-properties fo:line-height="115%" fo:margin-right="0cm" fo:margin-top="0pt" fo:margin-bottom="0pt" fo:border="none"/>
      <style:text-properties/>
    </style:style>
    <style:style style:family="text" style:name="T867">
      <style:text-properties fo:color="#1f1f1f" fo:font-family="Arial" style:font-family-asian="Arial" style:font-family-complex="Arial" fo:font-size="12pt"/>
    </style:style>
    <style:style style:parent-style-name="668" style:list-style-name="WWNum23" style:family="paragraph" style:name="P413">
      <style:paragraph-properties fo:line-height="115%" fo:margin-right="0cm" fo:margin-top="0pt" fo:margin-bottom="0pt" fo:border="none"/>
      <style:text-properties/>
    </style:style>
    <style:style style:family="text" style:name="T868">
      <style:text-properties fo:color="#1f1f1f" fo:font-family="Arial" style:font-family-asian="Arial" style:font-family-complex="Arial" fo:font-size="12pt"/>
    </style:style>
    <style:style style:family="paragraph" style:name="P414">
      <style:paragraph-properties/>
      <style:text-properties fo:font-family="Arial" style:font-family-asian="Arial" style:font-family-complex="Arial" fo:font-size="12pt" style:font-size-complex="12pt"/>
    </style:style>
    <style:style style:family="text" style:name="T869">
      <style:text-properties fo:font-family="Arial" style:font-family-asian="Arial" style:font-family-complex="Arial" fo:font-size="12pt" style:font-size-complex="12pt"/>
    </style:style>
    <style:style style:family="text" style:name="T870">
      <style:text-properties fo:font-family="Arial" style:font-family-asian="Arial" style:font-family-complex="Arial" fo:font-size="12pt" style:font-size-complex="12pt"/>
    </style:style>
    <style:style style:family="text" style:name="T871">
      <style:text-properties fo:font-family="Arial" style:font-family-asian="Arial" style:font-family-complex="Arial" fo:font-size="12pt" style:font-size-complex="12pt"/>
    </style:style>
    <style:style style:family="paragraph" style:name="P415">
      <style:paragraph-properties fo:line-height="115%" fo:margin-left="0cm" fo:margin-right="0cm" fo:text-indent="0cm" fo:margin-top="0pt" fo:margin-bottom="0pt" fo:break-before="page" fo:border="none"/>
      <style:text-properties fo:font-family="Arial" style:font-family-asian="Arial" style:font-family-complex="Arial" fo:font-size="12pt" style:font-size-complex="12pt"/>
    </style:style>
    <style:style style:family="text" style:name="T872">
      <style:text-properties fo:color="#1f1f1f" fo:font-family="Arial" style:font-family-asian="Arial" style:font-family-complex="Arial" fo:font-size="12pt"/>
    </style:style>
    <style:style style:family="text" style:name="T873">
      <style:text-properties fo:color="#1f1f1f" fo:font-family="Arial" style:font-family-asian="Arial" style:font-family-complex="Arial" fo:font-size="12pt"/>
    </style:style>
    <style:style style:family="text" style:name="T874">
      <style:text-properties fo:color="#1f1f1f" fo:font-family="Arial" style:font-family-asian="Arial" style:font-family-complex="Arial" fo:font-size="12pt"/>
    </style:style>
    <style:style style:parent-style-name="668" style:list-style-name="WWNum22" style:family="paragraph" style:name="P416">
      <style:paragraph-properties fo:line-height="115%" fo:margin-right="0cm" fo:margin-top="0pt" fo:margin-bottom="0pt" fo:border="none"/>
      <style:text-properties/>
    </style:style>
    <style:style style:family="text" style:name="T875">
      <style:text-properties fo:color="#1f1f1f" fo:font-family="Arial" style:font-family-asian="Arial" style:font-family-complex="Arial" fo:font-size="12pt"/>
    </style:style>
    <style:style style:parent-style-name="668" style:list-style-name="WWNum22" style:family="paragraph" style:name="P417">
      <style:paragraph-properties fo:line-height="115%" fo:margin-right="0cm" fo:margin-top="0pt" fo:margin-bottom="0pt" fo:border="none"/>
      <style:text-properties/>
    </style:style>
    <style:style style:family="text" style:name="T876">
      <style:text-properties fo:color="#1f1f1f" fo:font-family="Arial" style:font-family-asian="Arial" style:font-family-complex="Arial" fo:font-size="12pt"/>
    </style:style>
    <style:style style:family="paragraph" style:name="P418">
      <style:paragraph-properties/>
      <style:text-properties/>
    </style:style>
    <style:style style:parent-style-name="141" style:family="paragraph" style:name="P419">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877">
      <style:text-properties fo:color="#1f1f1f" fo:font-family="Arial" style:font-family-asian="Arial" style:font-family-complex="Arial" fo:font-size="14pt" fo:font-weight="bold"/>
    </style:style>
    <style:style style:family="paragraph" style:name="P420">
      <style:paragraph-properties fo:line-height="115%" fo:margin-left="0cm" fo:margin-right="0cm" fo:text-indent="0cm" fo:margin-top="0pt" fo:margin-bottom="0pt" fo:border="none"/>
      <style:text-properties/>
    </style:style>
    <style:style style:family="text" style:name="T878">
      <style:text-properties fo:color="#1f1f1f" fo:font-family="Arial" style:font-family-asian="Arial" style:font-family-complex="Arial" fo:font-size="12pt"/>
    </style:style>
    <style:style style:parent-style-name="142" style:family="paragraph" style:name="P42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79">
      <style:text-properties fo:color="#1f1f1f" fo:font-family="Arial" style:font-family-asian="Arial" style:font-family-complex="Arial" fo:font-size="12pt" fo:font-weight="bold"/>
    </style:style>
    <style:style style:family="paragraph" style:name="P422">
      <style:paragraph-properties fo:line-height="115%" fo:margin-left="0cm" fo:margin-right="0cm" fo:text-indent="0cm" fo:margin-top="0pt" fo:margin-bottom="0pt" fo:border="none"/>
      <style:text-properties/>
    </style:style>
    <style:style style:family="text" style:name="T880">
      <style:text-properties fo:color="#1f1f1f" fo:font-family="Arial" style:font-family-asian="Arial" style:font-family-complex="Arial" fo:font-size="12pt"/>
    </style:style>
    <style:style style:parent-style-name="142" style:family="paragraph" style:name="P42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81">
      <style:text-properties fo:color="#1f1f1f" fo:font-family="Arial" style:font-family-asian="Arial" style:font-family-complex="Arial" fo:font-size="12pt" fo:font-weight="bold"/>
    </style:style>
    <style:style style:family="paragraph" style:name="P424">
      <style:paragraph-properties fo:line-height="115%" fo:margin-left="0cm" fo:margin-right="0cm" fo:text-indent="0cm" fo:margin-top="0pt" fo:margin-bottom="0pt" fo:border="none"/>
      <style:text-properties/>
    </style:style>
    <style:style style:family="text" style:name="T882">
      <style:text-properties fo:color="#1f1f1f" fo:font-family="Arial" style:font-family-asian="Arial" style:font-family-complex="Arial" fo:font-size="12pt"/>
    </style:style>
    <style:style style:family="text" style:name="T883">
      <style:text-properties fo:color="#1f1f1f" fo:font-family="Arial" style:font-family-asian="Arial" style:font-family-complex="Arial" fo:font-size="12pt"/>
    </style:style>
    <style:style style:parent-style-name="142" style:family="paragraph" style:name="P42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84">
      <style:text-properties fo:color="#1f1f1f" fo:font-family="Arial" style:font-family-asian="Arial" style:font-family-complex="Arial" fo:font-size="12pt" fo:font-weight="bold"/>
    </style:style>
    <style:style style:family="paragraph" style:name="P426">
      <style:paragraph-properties fo:line-height="115%" fo:margin-left="0cm" fo:margin-right="0cm" fo:text-indent="0cm" fo:margin-top="0pt" fo:margin-bottom="0pt" fo:border="none"/>
      <style:text-properties/>
    </style:style>
    <style:style style:family="text" style:name="T885">
      <style:text-properties fo:color="#1f1f1f" fo:font-family="Arial" style:font-family-asian="Arial" style:font-family-complex="Arial" fo:font-size="12pt"/>
    </style:style>
    <style:style style:family="text" style:name="T886">
      <style:text-properties fo:color="#1f1f1f" fo:font-family="Arial" style:font-family-asian="Arial" style:font-family-complex="Arial" fo:font-size="12pt"/>
    </style:style>
    <style:style style:parent-style-name="142" style:family="paragraph" style:name="P42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87">
      <style:text-properties fo:color="#1f1f1f" fo:font-family="Arial" style:font-family-asian="Arial" style:font-family-complex="Arial" fo:font-size="12pt" fo:font-weight="bold"/>
    </style:style>
    <style:style style:family="paragraph" style:name="P428">
      <style:paragraph-properties fo:line-height="115%" fo:margin-left="0cm" fo:margin-right="0cm" fo:text-indent="0cm" fo:margin-top="0pt" fo:margin-bottom="0pt" fo:border="none"/>
      <style:text-properties/>
    </style:style>
    <style:style style:family="text" style:name="T888">
      <style:text-properties fo:color="#1f1f1f" fo:font-family="Arial" style:font-family-asian="Arial" style:font-family-complex="Arial" fo:font-size="12pt"/>
    </style:style>
    <style:style style:family="text" style:name="T889">
      <style:text-properties fo:color="#1f1f1f" fo:font-family="Arial" style:font-family-asian="Arial" style:font-family-complex="Arial" fo:font-size="12pt"/>
    </style:style>
    <style:style style:parent-style-name="141" style:family="paragraph" style:name="P429">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90">
      <style:text-properties fo:color="#1f1f1f" fo:font-family="Arial" style:font-family-asian="Arial" style:font-family-complex="Arial" fo:font-size="14pt" fo:font-weight="bold"/>
    </style:style>
    <style:style style:parent-style-name="668" style:list-style-name="WWNum24" style:family="paragraph" style:name="P430">
      <style:paragraph-properties fo:line-height="115%" fo:margin-right="0cm" fo:margin-top="0pt" fo:margin-bottom="0pt" fo:border="none"/>
      <style:text-properties/>
    </style:style>
    <style:style style:family="text" style:name="T891">
      <style:text-properties fo:color="#1f1f1f" fo:font-family="Arial" style:font-family-asian="Arial" style:font-family-complex="Arial" fo:font-size="12pt"/>
    </style:style>
    <style:style style:parent-style-name="668" style:list-style-name="WWNum24" style:family="paragraph" style:name="P431">
      <style:paragraph-properties fo:line-height="115%" fo:margin-right="0cm" fo:margin-top="0pt" fo:margin-bottom="0pt" fo:border="none"/>
      <style:text-properties/>
    </style:style>
    <style:style style:family="text" style:name="T892">
      <style:text-properties fo:color="#1f1f1f" fo:font-family="Arial" style:font-family-asian="Arial" style:font-family-complex="Arial" fo:font-size="12pt"/>
    </style:style>
    <style:style style:parent-style-name="668" style:list-style-name="WWNum24" style:family="paragraph" style:name="P432">
      <style:paragraph-properties fo:line-height="115%" fo:margin-right="0cm" fo:margin-top="0pt" fo:margin-bottom="0pt" fo:border="none"/>
      <style:text-properties/>
    </style:style>
    <style:style style:family="text" style:name="T893">
      <style:text-properties fo:color="#1f1f1f" fo:font-family="Arial" style:font-family-asian="Arial" style:font-family-complex="Arial" fo:font-size="12pt"/>
    </style:style>
    <style:style style:parent-style-name="668" style:list-style-name="WWNum24" style:family="paragraph" style:name="P433">
      <style:paragraph-properties fo:line-height="115%" fo:margin-right="0cm" fo:margin-top="0pt" fo:margin-bottom="0pt" fo:border="none"/>
      <style:text-properties/>
    </style:style>
    <style:style style:family="text" style:name="T894">
      <style:text-properties fo:color="#1f1f1f" fo:font-family="Arial" style:font-family-asian="Arial" style:font-family-complex="Arial" fo:font-size="12pt"/>
    </style:style>
    <style:style style:family="paragraph" style:name="P434">
      <style:paragraph-properties/>
      <style:text-properties/>
    </style:style>
    <style:style style:family="paragraph" style:name="P435">
      <style:paragraph-properties fo:line-height="115%" fo:margin-left="0cm" fo:margin-right="0cm" fo:text-indent="0cm" fo:margin-top="0pt" fo:margin-bottom="0pt" fo:break-before="page" fo:border="none"/>
      <style:text-properties/>
    </style:style>
    <style:style style:family="text" style:name="T895">
      <style:text-properties fo:color="#1f1f1f" fo:font-family="Arial" style:font-family-asian="Arial" style:font-family-complex="Arial" fo:font-size="12pt"/>
    </style:style>
    <style:style style:parent-style-name="141" style:family="paragraph" style:name="P43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896">
      <style:text-properties fo:color="#1f1f1f" fo:font-family="Arial" style:font-family-asian="Arial" style:font-family-complex="Arial" fo:font-size="14pt" fo:font-weight="bold"/>
    </style:style>
    <style:style style:family="paragraph" style:name="P437">
      <style:paragraph-properties fo:line-height="115%" fo:margin-left="0cm" fo:margin-right="0cm" fo:text-indent="0cm" fo:margin-top="0pt" fo:margin-bottom="0pt" fo:border="none"/>
      <style:text-properties/>
    </style:style>
    <style:style style:family="text" style:name="T897">
      <style:text-properties fo:color="#1f1f1f" fo:font-family="Arial" style:font-family-asian="Arial" style:font-family-complex="Arial" fo:font-size="12pt"/>
    </style:style>
    <style:style style:parent-style-name="142" style:family="paragraph" style:name="P43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898">
      <style:text-properties fo:color="#1f1f1f" fo:font-family="Arial" style:font-family-asian="Arial" style:font-family-complex="Arial" fo:font-size="12pt" fo:font-weight="bold"/>
    </style:style>
    <style:style style:family="paragraph" style:name="P439">
      <style:paragraph-properties fo:line-height="115%" fo:margin-left="0cm" fo:margin-right="0cm" fo:text-indent="0cm" fo:margin-top="0pt" fo:margin-bottom="0pt" fo:border="none"/>
      <style:text-properties/>
    </style:style>
    <style:style style:family="text" style:name="T899">
      <style:text-properties fo:color="#1f1f1f" fo:font-family="Arial" style:font-family-asian="Arial" style:font-family-complex="Arial" fo:font-size="12pt"/>
    </style:style>
    <style:style style:parent-style-name="142" style:family="paragraph" style:name="P44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0">
      <style:text-properties fo:color="#1f1f1f" fo:font-family="Arial" style:font-family-asian="Arial" style:font-family-complex="Arial" fo:font-size="12pt" fo:font-weight="bold"/>
    </style:style>
    <style:style style:family="paragraph" style:name="P441">
      <style:paragraph-properties fo:line-height="115%" fo:margin-left="0cm" fo:margin-right="0cm" fo:text-indent="0cm" fo:margin-top="0pt" fo:margin-bottom="0pt" fo:border="none"/>
      <style:text-properties/>
    </style:style>
    <style:style style:family="text" style:name="T901">
      <style:text-properties fo:color="#1f1f1f" fo:font-family="Arial" style:font-family-asian="Arial" style:font-family-complex="Arial" fo:font-size="12pt"/>
    </style:style>
    <style:style style:parent-style-name="142" style:family="paragraph" style:name="P44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2">
      <style:text-properties fo:color="#1f1f1f" fo:font-family="Arial" style:font-family-asian="Arial" style:font-family-complex="Arial" fo:font-size="12pt" fo:font-weight="bold"/>
    </style:style>
    <style:style style:family="paragraph" style:name="P443">
      <style:paragraph-properties fo:line-height="115%" fo:margin-left="0cm" fo:margin-right="0cm" fo:text-indent="0cm" fo:margin-top="0pt" fo:margin-bottom="0pt" fo:border="none"/>
      <style:text-properties/>
    </style:style>
    <style:style style:family="text" style:name="T903">
      <style:text-properties fo:color="#1f1f1f" fo:font-family="Arial" style:font-family-asian="Arial" style:font-family-complex="Arial" fo:font-size="12pt"/>
    </style:style>
    <style:style style:parent-style-name="142" style:family="paragraph" style:name="P44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04">
      <style:text-properties fo:color="#1f1f1f" fo:font-family="Arial" style:font-family-asian="Arial" style:font-family-complex="Arial" fo:font-size="12pt" fo:font-weight="bold"/>
    </style:style>
    <style:style style:family="paragraph" style:name="P445">
      <style:paragraph-properties fo:line-height="115%" fo:margin-left="0cm" fo:margin-right="0cm" fo:text-indent="0cm" fo:margin-top="0pt" fo:margin-bottom="0pt" fo:border="none"/>
      <style:text-properties/>
    </style:style>
    <style:style style:family="text" style:name="T905">
      <style:text-properties fo:color="#1f1f1f" fo:font-family="Arial" style:font-family-asian="Arial" style:font-family-complex="Arial" fo:font-size="12pt"/>
    </style:style>
    <style:style style:parent-style-name="141" style:family="paragraph" style:name="P446">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06">
      <style:text-properties fo:color="#1f1f1f" fo:font-family="Arial" style:font-family-asian="Arial" style:font-family-complex="Arial" fo:font-size="14pt" fo:font-weight="bold"/>
    </style:style>
    <style:style style:parent-style-name="668" style:list-style-name="WWNum25" style:family="paragraph" style:name="P447">
      <style:paragraph-properties fo:line-height="115%" fo:margin-right="0cm" fo:margin-top="0pt" fo:margin-bottom="0pt" fo:border="none"/>
      <style:text-properties/>
    </style:style>
    <style:style style:family="text" style:name="T907">
      <style:text-properties fo:color="#1f1f1f" fo:font-family="Arial" style:font-family-asian="Arial" style:font-family-complex="Arial" fo:font-size="12pt"/>
    </style:style>
    <style:style style:parent-style-name="668" style:list-style-name="WWNum25" style:family="paragraph" style:name="P448">
      <style:paragraph-properties fo:line-height="115%" fo:margin-right="0cm" fo:margin-top="0pt" fo:margin-bottom="0pt" fo:border="none"/>
      <style:text-properties/>
    </style:style>
    <style:style style:family="text" style:name="T908">
      <style:text-properties fo:color="#1f1f1f" fo:font-family="Arial" style:font-family-asian="Arial" style:font-family-complex="Arial" fo:font-size="12pt"/>
    </style:style>
    <style:style style:parent-style-name="668" style:list-style-name="WWNum25" style:family="paragraph" style:name="P449">
      <style:paragraph-properties fo:line-height="115%" fo:margin-right="0cm" fo:margin-top="0pt" fo:margin-bottom="0pt" fo:border="none"/>
      <style:text-properties/>
    </style:style>
    <style:style style:family="text" style:name="T909">
      <style:text-properties fo:color="#1f1f1f" fo:font-family="Arial" style:font-family-asian="Arial" style:font-family-complex="Arial" fo:font-size="12pt"/>
    </style:style>
    <style:style style:parent-style-name="668" style:list-style-name="WWNum25" style:family="paragraph" style:name="P450">
      <style:paragraph-properties fo:line-height="115%" fo:margin-right="0cm" fo:margin-top="0pt" fo:margin-bottom="0pt" fo:border="none"/>
      <style:text-properties/>
    </style:style>
    <style:style style:family="text" style:name="T910">
      <style:text-properties fo:color="#1f1f1f" fo:font-family="Arial" style:font-family-asian="Arial" style:font-family-complex="Arial" fo:font-size="12pt"/>
    </style:style>
    <style:style style:family="paragraph" style:name="P451">
      <style:paragraph-properties/>
      <style:text-properties/>
    </style:style>
    <style:style style:parent-style-name="141" style:family="paragraph" style:name="P452">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911">
      <style:text-properties fo:color="#1f1f1f" fo:font-family="Arial" style:font-family-asian="Arial" style:font-family-complex="Arial" fo:font-size="14pt" fo:font-weight="bold"/>
    </style:style>
    <style:style style:family="paragraph" style:name="P453">
      <style:paragraph-properties fo:line-height="115%" fo:margin-left="0cm" fo:margin-right="0cm" fo:text-indent="0cm" fo:margin-top="0pt" fo:margin-bottom="0pt" fo:border="none"/>
      <style:text-properties/>
    </style:style>
    <style:style style:family="text" style:name="T912">
      <style:text-properties fo:color="#1f1f1f" fo:font-family="Arial" style:font-family-asian="Arial" style:font-family-complex="Arial" fo:font-size="12pt"/>
    </style:style>
    <style:style style:parent-style-name="142" style:family="paragraph" style:name="P4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13">
      <style:text-properties fo:color="#1f1f1f" fo:font-family="Arial" style:font-family-asian="Arial" style:font-family-complex="Arial" fo:font-size="12pt" fo:font-weight="bold"/>
    </style:style>
    <style:style style:family="paragraph" style:name="P455">
      <style:paragraph-properties fo:line-height="115%" fo:margin-left="0cm" fo:margin-right="0cm" fo:text-indent="0cm" fo:margin-top="0pt" fo:margin-bottom="0pt" fo:border="none"/>
      <style:text-properties/>
    </style:style>
    <style:style style:family="text" style:name="T914">
      <style:text-properties fo:color="#1f1f1f" fo:font-family="Arial" style:font-family-asian="Arial" style:font-family-complex="Arial" fo:font-size="12pt"/>
    </style:style>
    <style:style style:parent-style-name="142" style:family="paragraph" style:name="P4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15">
      <style:text-properties fo:color="#1f1f1f" fo:font-family="Arial" style:font-family-asian="Arial" style:font-family-complex="Arial" fo:font-size="12pt" fo:font-weight="bold"/>
    </style:style>
    <style:style style:family="paragraph" style:name="P457">
      <style:paragraph-properties fo:line-height="115%" fo:margin-left="0cm" fo:margin-right="0cm" fo:text-indent="0cm" fo:margin-top="0pt" fo:margin-bottom="0pt" fo:border="none"/>
      <style:text-properties/>
    </style:style>
    <style:style style:family="text" style:name="T916">
      <style:text-properties fo:color="#1f1f1f" fo:font-family="Arial" style:font-family-asian="Arial" style:font-family-complex="Arial" fo:font-size="12pt"/>
    </style:style>
    <style:style style:parent-style-name="142" style:family="paragraph" style:name="P45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17">
      <style:text-properties fo:color="#1f1f1f" fo:font-family="Arial" style:font-family-asian="Arial" style:font-family-complex="Arial" fo:font-size="12pt" fo:font-weight="bold"/>
    </style:style>
    <style:style style:family="paragraph" style:name="P459">
      <style:paragraph-properties fo:line-height="115%" fo:margin-left="0cm" fo:margin-right="0cm" fo:text-indent="0cm" fo:margin-top="0pt" fo:margin-bottom="0pt" fo:border="none"/>
      <style:text-properties/>
    </style:style>
    <style:style style:family="text" style:name="T918">
      <style:text-properties fo:color="#1f1f1f" fo:font-family="Arial" style:font-family-asian="Arial" style:font-family-complex="Arial" fo:font-size="12pt"/>
    </style:style>
    <style:style style:parent-style-name="142" style:family="paragraph" style:name="P46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19">
      <style:text-properties fo:color="#1f1f1f" fo:font-family="Arial" style:font-family-asian="Arial" style:font-family-complex="Arial" fo:font-size="12pt" fo:font-weight="bold"/>
    </style:style>
    <style:style style:family="paragraph" style:name="P461">
      <style:paragraph-properties fo:line-height="115%" fo:margin-left="0cm" fo:margin-right="0cm" fo:text-indent="0cm" fo:margin-top="0pt" fo:margin-bottom="0pt" fo:border="none"/>
      <style:text-properties/>
    </style:style>
    <style:style style:family="text" style:name="T920">
      <style:text-properties fo:color="#1f1f1f" fo:font-family="Arial" style:font-family-asian="Arial" style:font-family-complex="Arial" fo:font-size="12pt"/>
    </style:style>
    <style:style style:parent-style-name="141" style:family="paragraph" style:name="P46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21">
      <style:text-properties fo:color="#1f1f1f" fo:font-family="Arial" style:font-family-asian="Arial" style:font-family-complex="Arial" fo:font-size="14pt" fo:font-weight="bold"/>
    </style:style>
    <style:style style:parent-style-name="668" style:list-style-name="WWNum26" style:family="paragraph" style:name="P463">
      <style:paragraph-properties fo:line-height="115%" fo:margin-right="0cm" fo:margin-top="0pt" fo:margin-bottom="0pt" fo:border="none"/>
      <style:text-properties/>
    </style:style>
    <style:style style:family="text" style:name="T922">
      <style:text-properties fo:color="#1f1f1f" fo:font-family="Arial" style:font-family-asian="Arial" style:font-family-complex="Arial" fo:font-size="12pt"/>
    </style:style>
    <style:style style:parent-style-name="668" style:list-style-name="WWNum26" style:family="paragraph" style:name="P464">
      <style:paragraph-properties fo:line-height="115%" fo:margin-right="0cm" fo:margin-top="0pt" fo:margin-bottom="0pt" fo:border="none"/>
      <style:text-properties/>
    </style:style>
    <style:style style:family="text" style:name="T923">
      <style:text-properties fo:color="#1f1f1f" fo:font-family="Arial" style:font-family-asian="Arial" style:font-family-complex="Arial" fo:font-size="12pt"/>
    </style:style>
    <style:style style:parent-style-name="668" style:list-style-name="WWNum26" style:family="paragraph" style:name="P465">
      <style:paragraph-properties fo:line-height="115%" fo:margin-right="0cm" fo:margin-top="0pt" fo:margin-bottom="0pt" fo:border="none"/>
      <style:text-properties/>
    </style:style>
    <style:style style:family="text" style:name="T924">
      <style:text-properties fo:color="#1f1f1f" fo:font-family="Arial" style:font-family-asian="Arial" style:font-family-complex="Arial" fo:font-size="12pt"/>
    </style:style>
    <style:style style:parent-style-name="668" style:list-style-name="WWNum26" style:family="paragraph" style:name="P466">
      <style:paragraph-properties fo:line-height="115%" fo:margin-right="0cm" fo:margin-top="0pt" fo:margin-bottom="0pt" fo:border="none"/>
      <style:text-properties/>
    </style:style>
    <style:style style:family="text" style:name="T925">
      <style:text-properties fo:color="#1f1f1f" fo:font-family="Arial" style:font-family-asian="Arial" style:font-family-complex="Arial" fo:font-size="12pt"/>
    </style:style>
    <style:style style:family="paragraph" style:name="P467">
      <style:paragraph-properties/>
      <style:text-properties/>
    </style:style>
    <style:style style:parent-style-name="141" style:family="paragraph" style:name="P468">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926">
      <style:text-properties fo:color="#1f1f1f" fo:font-family="Arial" style:font-family-asian="Arial" style:font-family-complex="Arial" fo:font-size="14pt" fo:font-weight="bold"/>
    </style:style>
    <style:style style:family="paragraph" style:name="P469">
      <style:paragraph-properties fo:line-height="115%" fo:margin-left="0cm" fo:margin-right="0cm" fo:text-indent="0cm" fo:margin-top="0pt" fo:margin-bottom="0pt" fo:border="none"/>
      <style:text-properties/>
    </style:style>
    <style:style style:family="text" style:name="T927">
      <style:text-properties fo:color="#1f1f1f" fo:font-family="Arial" style:font-family-asian="Arial" style:font-family-complex="Arial" fo:font-size="12pt"/>
    </style:style>
    <style:style style:parent-style-name="142" style:family="paragraph" style:name="P47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28">
      <style:text-properties fo:color="#1f1f1f" fo:font-family="Arial" style:font-family-asian="Arial" style:font-family-complex="Arial" fo:font-size="12pt" fo:font-weight="bold"/>
    </style:style>
    <style:style style:family="paragraph" style:name="P471">
      <style:paragraph-properties fo:line-height="115%" fo:margin-left="0cm" fo:margin-right="0cm" fo:text-indent="0cm" fo:margin-top="0pt" fo:margin-bottom="0pt" fo:border="none"/>
      <style:text-properties/>
    </style:style>
    <style:style style:family="text" style:name="T929">
      <style:text-properties fo:color="#1f1f1f" fo:font-family="Arial" style:font-family-asian="Arial" style:font-family-complex="Arial" fo:font-size="12pt"/>
    </style:style>
    <style:style style:family="text" style:name="T930">
      <style:text-properties fo:color="#1f1f1f" fo:font-family="Arial" style:font-family-asian="Arial" style:font-family-complex="Arial" fo:font-size="12pt"/>
    </style:style>
    <style:style style:parent-style-name="142" style:family="paragraph" style:name="P47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31">
      <style:text-properties fo:color="#1f1f1f" fo:font-family="Arial" style:font-family-asian="Arial" style:font-family-complex="Arial" fo:font-size="12pt" fo:font-weight="bold"/>
    </style:style>
    <style:style style:family="paragraph" style:name="P473">
      <style:paragraph-properties fo:line-height="115%" fo:margin-left="0cm" fo:margin-right="0cm" fo:text-indent="0cm" fo:margin-top="0pt" fo:margin-bottom="0pt" fo:border="none"/>
      <style:text-properties/>
    </style:style>
    <style:style style:family="text" style:name="T932">
      <style:text-properties fo:color="#1f1f1f" fo:font-family="Arial" style:font-family-asian="Arial" style:font-family-complex="Arial" fo:font-size="12pt"/>
    </style:style>
    <style:style style:family="text" style:name="T933">
      <style:text-properties fo:color="#1f1f1f" fo:font-family="Arial" style:font-family-asian="Arial" style:font-family-complex="Arial" fo:font-size="12pt"/>
    </style:style>
    <style:style style:parent-style-name="142" style:family="paragraph" style:name="P47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34">
      <style:text-properties fo:color="#1f1f1f" fo:font-family="Arial" style:font-family-asian="Arial" style:font-family-complex="Arial" fo:font-size="12pt" fo:font-weight="bold"/>
    </style:style>
    <style:style style:family="paragraph" style:name="P475">
      <style:paragraph-properties fo:line-height="115%" fo:margin-left="0cm" fo:margin-right="0cm" fo:text-indent="0cm" fo:margin-top="0pt" fo:margin-bottom="0pt" fo:border="none"/>
      <style:text-properties/>
    </style:style>
    <style:style style:family="text" style:name="T935">
      <style:text-properties fo:color="#1f1f1f" fo:font-family="Arial" style:font-family-asian="Arial" style:font-family-complex="Arial" fo:font-size="12pt"/>
    </style:style>
    <style:style style:family="text" style:name="T936">
      <style:text-properties fo:color="#1f1f1f" fo:font-family="Arial" style:font-family-asian="Arial" style:font-family-complex="Arial" fo:font-size="12pt"/>
    </style:style>
    <style:style style:parent-style-name="142" style:family="paragraph" style:name="P47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37">
      <style:text-properties fo:color="#1f1f1f" fo:font-family="Arial" style:font-family-asian="Arial" style:font-family-complex="Arial" fo:font-size="12pt" fo:font-weight="bold"/>
    </style:style>
    <style:style style:family="paragraph" style:name="P477">
      <style:paragraph-properties fo:line-height="115%" fo:margin-left="0cm" fo:margin-right="0cm" fo:text-indent="0cm" fo:margin-top="0pt" fo:margin-bottom="0pt" fo:border="none"/>
      <style:text-properties/>
    </style:style>
    <style:style style:family="text" style:name="T938">
      <style:text-properties fo:color="#1f1f1f" fo:font-family="Arial" style:font-family-asian="Arial" style:font-family-complex="Arial" fo:font-size="12pt"/>
    </style:style>
    <style:style style:family="text" style:name="T939">
      <style:text-properties fo:color="#1f1f1f" fo:font-family="Arial" style:font-family-asian="Arial" style:font-family-complex="Arial" fo:font-size="12pt"/>
    </style:style>
    <style:style style:parent-style-name="141" style:family="paragraph" style:name="P47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40">
      <style:text-properties fo:color="#1f1f1f" fo:font-family="Arial" style:font-family-asian="Arial" style:font-family-complex="Arial" fo:font-size="14pt" fo:font-weight="bold"/>
    </style:style>
    <style:style style:parent-style-name="668" style:list-style-name="WWNum27" style:family="paragraph" style:name="P479">
      <style:paragraph-properties fo:line-height="115%" fo:margin-right="0cm" fo:margin-top="0pt" fo:margin-bottom="0pt" fo:border="none"/>
      <style:text-properties/>
    </style:style>
    <style:style style:family="text" style:name="T941">
      <style:text-properties fo:color="#1f1f1f" fo:font-family="Arial" style:font-family-asian="Arial" style:font-family-complex="Arial" fo:font-size="12pt"/>
    </style:style>
    <style:style style:parent-style-name="668" style:list-style-name="WWNum27" style:family="paragraph" style:name="P480">
      <style:paragraph-properties fo:line-height="115%" fo:margin-right="0cm" fo:margin-top="0pt" fo:margin-bottom="0pt" fo:border="none"/>
      <style:text-properties/>
    </style:style>
    <style:style style:family="text" style:name="T942">
      <style:text-properties fo:color="#1f1f1f" fo:font-family="Arial" style:font-family-asian="Arial" style:font-family-complex="Arial" fo:font-size="12pt"/>
    </style:style>
    <style:style style:parent-style-name="668" style:list-style-name="WWNum27" style:family="paragraph" style:name="P481">
      <style:paragraph-properties fo:line-height="115%" fo:margin-right="0cm" fo:margin-top="0pt" fo:margin-bottom="0pt" fo:border="none"/>
      <style:text-properties/>
    </style:style>
    <style:style style:family="text" style:name="T943">
      <style:text-properties fo:color="#1f1f1f" fo:font-family="Arial" style:font-family-asian="Arial" style:font-family-complex="Arial" fo:font-size="12pt"/>
    </style:style>
    <style:style style:parent-style-name="668" style:list-style-name="WWNum27" style:family="paragraph" style:name="P482">
      <style:paragraph-properties fo:line-height="115%" fo:margin-right="0cm" fo:margin-top="0pt" fo:margin-bottom="0pt" fo:border="none"/>
      <style:text-properties/>
    </style:style>
    <style:style style:family="text" style:name="T944">
      <style:text-properties fo:color="#1f1f1f" fo:font-family="Arial" style:font-family-asian="Arial" style:font-family-complex="Arial" fo:font-size="12pt"/>
    </style:style>
    <style:style style:family="paragraph" style:name="P483">
      <style:paragraph-properties/>
      <style:text-properties/>
    </style:style>
    <style:style style:family="paragraph" style:name="P484">
      <style:paragraph-properties fo:line-height="115%" fo:margin-left="0cm" fo:margin-right="0cm" fo:text-indent="0cm" fo:margin-top="0pt" fo:margin-bottom="0pt" fo:break-before="page" fo:border="none"/>
      <style:text-properties/>
    </style:style>
    <style:style style:family="text" style:name="T945">
      <style:text-properties fo:color="#1f1f1f" fo:font-family="Arial" style:font-family-asian="Arial" style:font-family-complex="Arial" fo:font-size="12pt"/>
    </style:style>
    <style:style style:parent-style-name="141" style:family="paragraph" style:name="P48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46">
      <style:text-properties fo:color="#1f1f1f" fo:font-family="Arial" style:font-family-asian="Arial" style:font-family-complex="Arial" fo:font-size="14pt" fo:font-weight="bold"/>
    </style:style>
    <style:style style:family="paragraph" style:name="P486">
      <style:paragraph-properties fo:line-height="115%" fo:margin-left="0cm" fo:margin-right="0cm" fo:text-indent="0cm" fo:margin-top="0pt" fo:margin-bottom="0pt" fo:border="none"/>
      <style:text-properties/>
    </style:style>
    <style:style style:family="text" style:name="T947">
      <style:text-properties fo:color="#1f1f1f" fo:font-family="Arial" style:font-family-asian="Arial" style:font-family-complex="Arial" fo:font-size="12pt"/>
    </style:style>
    <style:style style:parent-style-name="142" style:family="paragraph" style:name="P48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48">
      <style:text-properties fo:color="#1f1f1f" fo:font-family="Arial" style:font-family-asian="Arial" style:font-family-complex="Arial" fo:font-size="12pt" fo:font-weight="bold"/>
    </style:style>
    <style:style style:family="paragraph" style:name="P488">
      <style:paragraph-properties fo:line-height="115%" fo:margin-left="0cm" fo:margin-right="0cm" fo:text-indent="0cm" fo:margin-top="0pt" fo:margin-bottom="0pt" fo:border="none"/>
      <style:text-properties/>
    </style:style>
    <style:style style:family="text" style:name="T949">
      <style:text-properties fo:color="#1f1f1f" fo:font-family="Arial" style:font-family-asian="Arial" style:font-family-complex="Arial" fo:font-size="12pt"/>
    </style:style>
    <style:style style:parent-style-name="142" style:family="paragraph" style:name="P48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50">
      <style:text-properties fo:color="#1f1f1f" fo:font-family="Arial" style:font-family-asian="Arial" style:font-family-complex="Arial" fo:font-size="12pt" fo:font-weight="bold"/>
    </style:style>
    <style:style style:family="paragraph" style:name="P490">
      <style:paragraph-properties fo:line-height="115%" fo:margin-left="0cm" fo:margin-right="0cm" fo:text-indent="0cm" fo:margin-top="0pt" fo:margin-bottom="0pt" fo:border="none"/>
      <style:text-properties/>
    </style:style>
    <style:style style:family="text" style:name="T951">
      <style:text-properties fo:color="#1f1f1f" fo:font-family="Arial" style:font-family-asian="Arial" style:font-family-complex="Arial" fo:font-size="12pt"/>
    </style:style>
    <style:style style:family="table" style:name="ta3">
      <style:paragraph-properties fo:line-height="100%" fo:margin-bottom="0pt"/>
      <style:table-properties style:width="8.808cm" fo:margin-left="0cm" table:align="left" style:use-optimal-column-width="true"/>
    </style:style>
    <style:style style:family="table-column" style:name="co7">
      <style:table-column-properties style:column-width="1.11cm" style:use-optimal-column-width="true"/>
    </style:style>
    <style:style style:family="table-column" style:name="co8">
      <style:table-column-properties style:column-width="3.71cm" style:use-optimal-column-width="true"/>
    </style:style>
    <style:style style:family="table-column" style:name="co9">
      <style:table-column-properties style:column-width="3.988cm" style:use-optimal-column-width="true"/>
    </style:style>
    <style:style style:family="table-row" style:name="ro7">
      <style:table-row-properties/>
    </style:style>
    <style:style style:family="table-cell" style:name="ce2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1">
      <style:paragraph-properties style:line-height-at-least="12pt" fo:margin-top="0pt" fo:margin-bottom="0pt"/>
      <style:text-properties/>
    </style:style>
    <style:style style:family="text" style:name="T952">
      <style:text-properties fo:color="#1f1f1f" fo:font-family="Arial" style:font-family-asian="Arial" style:font-family-complex="Arial" fo:font-size="12pt" fo:font-weight="bold"/>
    </style:style>
    <style:style style:family="table-cell" style:name="ce2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2">
      <style:paragraph-properties style:line-height-at-least="12pt" fo:margin-top="0pt" fo:margin-bottom="0pt"/>
      <style:text-properties/>
    </style:style>
    <style:style style:family="text" style:name="T953">
      <style:text-properties fo:color="#1f1f1f" fo:font-family="Arial" style:font-family-asian="Arial" style:font-family-complex="Arial" fo:font-size="12pt" fo:font-weight="bold"/>
    </style:style>
    <style:style style:family="table-cell" style:name="ce2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3">
      <style:paragraph-properties style:line-height-at-least="12pt" fo:margin-top="0pt" fo:margin-bottom="0pt"/>
      <style:text-properties/>
    </style:style>
    <style:style style:family="text" style:name="T954">
      <style:text-properties fo:color="#1f1f1f" fo:font-family="Arial" style:font-family-asian="Arial" style:font-family-complex="Arial" fo:font-size="12pt" fo:font-weight="bold"/>
    </style:style>
    <style:style style:family="table-row" style:name="ro8">
      <style:table-row-properties/>
    </style:style>
    <style:style style:family="table-cell" style:name="ce2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4">
      <style:paragraph-properties style:line-height-at-least="12pt" fo:margin-top="0pt" fo:margin-bottom="0pt"/>
      <style:text-properties/>
    </style:style>
    <style:style style:family="text" style:name="T955">
      <style:text-properties fo:color="#1f1f1f" fo:font-family="Arial" style:font-family-asian="Arial" style:font-family-complex="Arial" fo:font-size="12pt"/>
    </style:style>
    <style:style style:family="table-cell" style:name="ce2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5">
      <style:paragraph-properties style:line-height-at-least="12pt" fo:margin-top="0pt" fo:margin-bottom="0pt"/>
      <style:text-properties/>
    </style:style>
    <style:style style:family="text" style:name="T956">
      <style:text-properties fo:color="#1f1f1f" fo:font-family="Arial" style:font-family-asian="Arial" style:font-family-complex="Arial" fo:font-size="12pt"/>
    </style:style>
    <style:style style:family="table-cell" style:name="ce2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6">
      <style:paragraph-properties style:line-height-at-least="12pt" fo:margin-top="0pt" fo:margin-bottom="0pt"/>
      <style:text-properties/>
    </style:style>
    <style:style style:family="text" style:name="T957">
      <style:text-properties fo:color="#1f1f1f" fo:font-family="Arial" style:font-family-asian="Arial" style:font-family-complex="Arial" fo:font-size="12pt"/>
    </style:style>
    <style:style style:family="table-row" style:name="ro9">
      <style:table-row-properties/>
    </style:style>
    <style:style style:family="table-cell" style:name="ce2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7">
      <style:paragraph-properties style:line-height-at-least="12pt" fo:margin-top="0pt" fo:margin-bottom="0pt"/>
      <style:text-properties/>
    </style:style>
    <style:style style:family="text" style:name="T958">
      <style:text-properties fo:color="#1f1f1f" fo:font-family="Arial" style:font-family-asian="Arial" style:font-family-complex="Arial" fo:font-size="12pt"/>
    </style:style>
    <style:style style:family="table-cell" style:name="ce2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8">
      <style:paragraph-properties style:line-height-at-least="12pt" fo:margin-top="0pt" fo:margin-bottom="0pt"/>
      <style:text-properties/>
    </style:style>
    <style:style style:family="text" style:name="T959">
      <style:text-properties fo:color="#1f1f1f" fo:font-family="Arial" style:font-family-asian="Arial" style:font-family-complex="Arial" fo:font-size="12pt"/>
    </style:style>
    <style:style style:family="table-cell" style:name="ce3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499">
      <style:paragraph-properties style:line-height-at-least="12pt" fo:margin-top="0pt" fo:margin-bottom="0pt"/>
      <style:text-properties/>
    </style:style>
    <style:style style:family="text" style:name="T960">
      <style:text-properties fo:color="#1f1f1f" fo:font-family="Arial" style:font-family-asian="Arial" style:font-family-complex="Arial" fo:font-size="12pt"/>
    </style:style>
    <style:style style:family="paragraph" style:name="P500">
      <style:paragraph-properties fo:line-height="115%" fo:margin-left="0cm" fo:margin-right="0cm" fo:text-indent="0cm" fo:margin-top="0pt" fo:margin-bottom="0pt" fo:border="none"/>
      <style:text-properties/>
    </style:style>
    <style:style style:family="text" style:name="T961">
      <style:text-properties fo:color="#1f1f1f" fo:font-family="Arial" style:font-family-asian="Arial" style:font-family-complex="Arial" fo:font-size="12pt"/>
    </style:style>
    <style:style style:parent-style-name="142" style:family="paragraph" style:name="P5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62">
      <style:text-properties fo:color="#1f1f1f" fo:font-family="Arial" style:font-family-asian="Arial" style:font-family-complex="Arial" fo:font-size="12pt" fo:font-weight="bold"/>
    </style:style>
    <style:style style:family="paragraph" style:name="P502">
      <style:paragraph-properties fo:line-height="115%" fo:margin-left="0cm" fo:margin-right="0cm" fo:text-indent="0cm" fo:margin-top="0pt" fo:margin-bottom="0pt" fo:border="none"/>
      <style:text-properties/>
    </style:style>
    <style:style style:family="text" style:name="T963">
      <style:text-properties fo:color="#1f1f1f" fo:font-family="Arial" style:font-family-asian="Arial" style:font-family-complex="Arial" fo:font-size="12pt"/>
    </style:style>
    <style:style style:parent-style-name="142" style:family="paragraph" style:name="P50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64">
      <style:text-properties fo:color="#1f1f1f" fo:font-family="Arial" style:font-family-asian="Arial" style:font-family-complex="Arial" fo:font-size="12pt" fo:font-weight="bold"/>
    </style:style>
    <style:style style:family="paragraph" style:name="P504">
      <style:paragraph-properties fo:line-height="115%" fo:margin-left="0cm" fo:margin-right="0cm" fo:text-indent="0cm" fo:margin-top="0pt" fo:margin-bottom="0pt" fo:border="none"/>
      <style:text-properties/>
    </style:style>
    <style:style style:family="text" style:name="T965">
      <style:text-properties fo:color="#1f1f1f" fo:font-family="Arial" style:font-family-asian="Arial" style:font-family-complex="Arial" fo:font-size="12pt"/>
    </style:style>
    <style:style style:parent-style-name="141" style:family="paragraph" style:name="P50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66">
      <style:text-properties fo:color="#1f1f1f" fo:font-family="Arial" style:font-family-asian="Arial" style:font-family-complex="Arial" fo:font-size="14pt" fo:font-weight="bold"/>
    </style:style>
    <style:style style:parent-style-name="668" style:list-style-name="WWNum28" style:family="paragraph" style:name="P506">
      <style:paragraph-properties fo:line-height="115%" fo:margin-right="0cm" fo:margin-top="0pt" fo:margin-bottom="0pt" fo:border="none"/>
      <style:text-properties/>
    </style:style>
    <style:style style:family="text" style:name="T967">
      <style:text-properties fo:color="#1f1f1f" fo:font-family="Arial" style:font-family-asian="Arial" style:font-family-complex="Arial" fo:font-size="12pt"/>
    </style:style>
    <style:style style:parent-style-name="668" style:list-style-name="WWNum28" style:family="paragraph" style:name="P507">
      <style:paragraph-properties fo:line-height="115%" fo:margin-right="0cm" fo:margin-top="0pt" fo:margin-bottom="0pt" fo:border="none"/>
      <style:text-properties/>
    </style:style>
    <style:style style:family="text" style:name="T968">
      <style:text-properties fo:color="#1f1f1f" fo:font-family="Arial" style:font-family-asian="Arial" style:font-family-complex="Arial" fo:font-size="12pt"/>
    </style:style>
    <style:style style:parent-style-name="668" style:list-style-name="WWNum28" style:family="paragraph" style:name="P508">
      <style:paragraph-properties fo:line-height="115%" fo:margin-right="0cm" fo:margin-top="0pt" fo:margin-bottom="0pt" fo:border="none"/>
      <style:text-properties/>
    </style:style>
    <style:style style:family="text" style:name="T969">
      <style:text-properties fo:color="#1f1f1f" fo:font-family="Arial" style:font-family-asian="Arial" style:font-family-complex="Arial" fo:font-size="12pt"/>
    </style:style>
    <style:style style:parent-style-name="668" style:list-style-name="WWNum28" style:family="paragraph" style:name="P509">
      <style:paragraph-properties fo:line-height="115%" fo:margin-right="0cm" fo:margin-top="0pt" fo:margin-bottom="0pt" fo:border="none"/>
      <style:text-properties/>
    </style:style>
    <style:style style:family="text" style:name="T970">
      <style:text-properties fo:color="#1f1f1f" fo:font-family="Arial" style:font-family-asian="Arial" style:font-family-complex="Arial" fo:font-size="12pt"/>
    </style:style>
    <style:style style:family="paragraph" style:name="P510">
      <style:paragraph-properties/>
      <style:text-properties/>
    </style:style>
    <style:style style:family="paragraph" style:name="P511">
      <style:paragraph-properties fo:line-height="115%" fo:margin-left="0cm" fo:margin-right="0cm" fo:text-indent="0cm" fo:margin-top="0pt" fo:margin-bottom="0pt" fo:break-before="page" fo:border="none"/>
      <style:text-properties/>
    </style:style>
    <style:style style:family="text" style:name="T971">
      <style:text-properties fo:color="#1f1f1f" fo:font-family="Arial" style:font-family-asian="Arial" style:font-family-complex="Arial" fo:font-size="12pt"/>
    </style:style>
    <style:style style:parent-style-name="141" style:family="paragraph" style:name="P51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72">
      <style:text-properties fo:color="#1f1f1f" fo:font-family="Arial" style:font-family-asian="Arial" style:font-family-complex="Arial" fo:font-size="14pt" fo:font-weight="bold"/>
    </style:style>
    <style:style style:family="paragraph" style:name="P513">
      <style:paragraph-properties fo:line-height="115%" fo:margin-left="0cm" fo:margin-right="0cm" fo:text-indent="0cm" fo:margin-top="0pt" fo:margin-bottom="0pt" fo:border="none"/>
      <style:text-properties/>
    </style:style>
    <style:style style:family="text" style:name="T973">
      <style:text-properties fo:color="#1f1f1f" fo:font-family="Arial" style:font-family-asian="Arial" style:font-family-complex="Arial" fo:font-size="12pt"/>
    </style:style>
    <style:style style:parent-style-name="142" style:family="paragraph" style:name="P51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74">
      <style:text-properties fo:color="#1f1f1f" fo:font-family="Arial" style:font-family-asian="Arial" style:font-family-complex="Arial" fo:font-size="12pt" fo:font-weight="bold"/>
    </style:style>
    <style:style style:family="paragraph" style:name="P515">
      <style:paragraph-properties fo:line-height="115%" fo:margin-left="0cm" fo:margin-right="0cm" fo:text-indent="0cm" fo:margin-top="0pt" fo:margin-bottom="0pt" fo:border="none"/>
      <style:text-properties/>
    </style:style>
    <style:style style:family="text" style:name="T975">
      <style:text-properties fo:color="#1f1f1f" fo:font-family="Arial" style:font-family-asian="Arial" style:font-family-complex="Arial" fo:font-size="12pt"/>
    </style:style>
    <style:style style:parent-style-name="142" style:family="paragraph" style:name="P51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76">
      <style:text-properties fo:color="#1f1f1f" fo:font-family="Arial" style:font-family-asian="Arial" style:font-family-complex="Arial" fo:font-size="12pt" fo:font-weight="bold"/>
    </style:style>
    <style:style style:family="paragraph" style:name="P517">
      <style:paragraph-properties fo:line-height="115%" fo:margin-left="0cm" fo:margin-right="0cm" fo:text-indent="0cm" fo:margin-top="0pt" fo:margin-bottom="0pt" fo:border="none"/>
      <style:text-properties/>
    </style:style>
    <style:style style:family="text" style:name="T977">
      <style:text-properties fo:color="#1f1f1f" fo:font-family="Arial" style:font-family-asian="Arial" style:font-family-complex="Arial" fo:font-size="12pt"/>
    </style:style>
    <style:style style:parent-style-name="668" style:list-style-name="WWNum29" style:family="paragraph" style:name="P518">
      <style:paragraph-properties fo:line-height="115%" fo:margin-right="0cm" fo:margin-top="0pt" fo:margin-bottom="0pt" fo:border="none"/>
      <style:text-properties/>
    </style:style>
    <style:style style:family="text" style:name="T978">
      <style:text-properties fo:color="#1f1f1f" fo:font-family="Arial" style:font-family-asian="Arial" style:font-family-complex="Arial" fo:font-size="12pt"/>
    </style:style>
    <style:style style:parent-style-name="668" style:list-style-name="WWNum29" style:family="paragraph" style:name="P519">
      <style:paragraph-properties fo:line-height="115%" fo:margin-right="0cm" fo:margin-top="0pt" fo:margin-bottom="0pt" fo:border="none"/>
      <style:text-properties/>
    </style:style>
    <style:style style:family="text" style:name="T979">
      <style:text-properties fo:color="#1f1f1f" fo:font-family="Arial" style:font-family-asian="Arial" style:font-family-complex="Arial" fo:font-size="12pt"/>
    </style:style>
    <style:style style:parent-style-name="668" style:list-style-name="WWNum29" style:family="paragraph" style:name="P520">
      <style:paragraph-properties fo:line-height="115%" fo:margin-right="0cm" fo:margin-top="0pt" fo:margin-bottom="0pt" fo:border="none"/>
      <style:text-properties/>
    </style:style>
    <style:style style:family="text" style:name="T980">
      <style:text-properties fo:color="#1f1f1f" fo:font-family="Arial" style:font-family-asian="Arial" style:font-family-complex="Arial" fo:font-size="12pt"/>
    </style:style>
    <style:style style:parent-style-name="142" style:family="paragraph" style:name="P52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81">
      <style:text-properties fo:color="#1f1f1f" fo:font-family="Arial" style:font-family-asian="Arial" style:font-family-complex="Arial" fo:font-size="12pt" fo:font-weight="bold"/>
    </style:style>
    <style:style style:family="paragraph" style:name="P522">
      <style:paragraph-properties fo:line-height="115%" fo:margin-left="0cm" fo:margin-right="0cm" fo:text-indent="0cm" fo:margin-top="0pt" fo:margin-bottom="0pt" fo:border="none"/>
      <style:text-properties/>
    </style:style>
    <style:style style:family="text" style:name="T982">
      <style:text-properties fo:color="#1f1f1f" fo:font-family="Arial" style:font-family-asian="Arial" style:font-family-complex="Arial" fo:font-size="12pt"/>
    </style:style>
    <style:style style:parent-style-name="668" style:list-style-name="WWNum29" style:family="paragraph" style:name="P523">
      <style:paragraph-properties fo:line-height="115%" fo:margin-right="0cm" fo:margin-top="0pt" fo:margin-bottom="0pt" fo:border="none"/>
      <style:text-properties/>
    </style:style>
    <style:style style:family="text" style:name="T983">
      <style:text-properties fo:color="#1f1f1f" fo:font-family="Arial" style:font-family-asian="Arial" style:font-family-complex="Arial" fo:font-size="12pt"/>
    </style:style>
    <style:style style:parent-style-name="668" style:list-style-name="WWNum29" style:family="paragraph" style:name="P524">
      <style:paragraph-properties fo:line-height="115%" fo:margin-right="0cm" fo:margin-top="0pt" fo:margin-bottom="0pt" fo:border="none"/>
      <style:text-properties/>
    </style:style>
    <style:style style:family="text" style:name="T984">
      <style:text-properties fo:color="#1f1f1f" fo:font-family="Arial" style:font-family-asian="Arial" style:font-family-complex="Arial" fo:font-size="12pt"/>
    </style:style>
    <style:style style:parent-style-name="668" style:list-style-name="WWNum29" style:family="paragraph" style:name="P525">
      <style:paragraph-properties fo:line-height="115%" fo:margin-right="0cm" fo:margin-top="0pt" fo:margin-bottom="0pt" fo:border="none"/>
      <style:text-properties/>
    </style:style>
    <style:style style:family="text" style:name="T985">
      <style:text-properties fo:color="#1f1f1f" fo:font-family="Arial" style:font-family-asian="Arial" style:font-family-complex="Arial" fo:font-size="12pt"/>
    </style:style>
    <style:style style:parent-style-name="142" style:family="paragraph" style:name="P52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86">
      <style:text-properties fo:color="#1f1f1f" fo:font-family="Arial" style:font-family-asian="Arial" style:font-family-complex="Arial" fo:font-size="12pt" fo:font-weight="bold"/>
    </style:style>
    <style:style style:family="paragraph" style:name="P527">
      <style:paragraph-properties fo:line-height="115%" fo:margin-left="0cm" fo:margin-right="0cm" fo:text-indent="0cm" fo:margin-top="0pt" fo:margin-bottom="0pt" fo:border="none"/>
      <style:text-properties/>
    </style:style>
    <style:style style:family="text" style:name="T987">
      <style:text-properties fo:color="#1f1f1f" fo:font-family="Arial" style:font-family-asian="Arial" style:font-family-complex="Arial" fo:font-size="12pt"/>
    </style:style>
    <style:style style:parent-style-name="141" style:family="paragraph" style:name="P52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88">
      <style:text-properties fo:color="#1f1f1f" fo:font-family="Arial" style:font-family-asian="Arial" style:font-family-complex="Arial" fo:font-size="14pt" fo:font-weight="bold"/>
    </style:style>
    <style:style style:parent-style-name="668" style:list-style-name="WWNum29" style:family="paragraph" style:name="P529">
      <style:paragraph-properties fo:line-height="115%" fo:margin-right="0cm" fo:margin-top="0pt" fo:margin-bottom="0pt" fo:border="none"/>
      <style:text-properties/>
    </style:style>
    <style:style style:family="text" style:name="T989">
      <style:text-properties fo:color="#1f1f1f" fo:font-family="Arial" style:font-family-asian="Arial" style:font-family-complex="Arial" fo:font-size="12pt"/>
    </style:style>
    <style:style style:parent-style-name="668" style:list-style-name="WWNum29" style:family="paragraph" style:name="P530">
      <style:paragraph-properties fo:line-height="115%" fo:margin-right="0cm" fo:margin-top="0pt" fo:margin-bottom="0pt" fo:border="none"/>
      <style:text-properties/>
    </style:style>
    <style:style style:family="text" style:name="T990">
      <style:text-properties fo:color="#1f1f1f" fo:font-family="Arial" style:font-family-asian="Arial" style:font-family-complex="Arial" fo:font-size="12pt"/>
    </style:style>
    <style:style style:parent-style-name="668" style:list-style-name="WWNum29" style:family="paragraph" style:name="P531">
      <style:paragraph-properties fo:line-height="115%" fo:margin-right="0cm" fo:margin-top="0pt" fo:margin-bottom="0pt" fo:border="none"/>
      <style:text-properties/>
    </style:style>
    <style:style style:family="text" style:name="T991">
      <style:text-properties fo:color="#1f1f1f" fo:font-family="Arial" style:font-family-asian="Arial" style:font-family-complex="Arial" fo:font-size="12pt"/>
    </style:style>
    <style:style style:parent-style-name="668" style:list-style-name="WWNum29" style:family="paragraph" style:name="P532">
      <style:paragraph-properties fo:line-height="115%" fo:margin-right="0cm" fo:margin-top="0pt" fo:margin-bottom="0pt" fo:border="none"/>
      <style:text-properties/>
    </style:style>
    <style:style style:family="text" style:name="T992">
      <style:text-properties fo:color="#1f1f1f" fo:font-family="Arial" style:font-family-asian="Arial" style:font-family-complex="Arial" fo:font-size="12pt"/>
    </style:style>
    <style:style style:family="paragraph" style:name="P533">
      <style:paragraph-properties/>
      <style:text-properties/>
    </style:style>
    <style:style style:family="paragraph" style:name="P534">
      <style:paragraph-properties fo:line-height="115%" fo:margin-left="0cm" fo:margin-right="0cm" fo:text-indent="0cm" fo:margin-top="0pt" fo:margin-bottom="0pt" fo:break-before="page" fo:border="none"/>
      <style:text-properties/>
    </style:style>
    <style:style style:family="text" style:name="T993">
      <style:text-properties fo:color="#1f1f1f" fo:font-family="Arial" style:font-family-asian="Arial" style:font-family-complex="Arial" fo:font-size="12pt"/>
    </style:style>
    <style:style style:parent-style-name="141" style:family="paragraph" style:name="P53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994">
      <style:text-properties fo:color="#1f1f1f" fo:font-family="Arial" style:font-family-asian="Arial" style:font-family-complex="Arial" fo:font-size="14pt" fo:font-weight="bold"/>
    </style:style>
    <style:style style:family="paragraph" style:name="P536">
      <style:paragraph-properties fo:line-height="115%" fo:margin-left="0cm" fo:margin-right="0cm" fo:text-indent="0cm" fo:margin-top="0pt" fo:margin-bottom="0pt" fo:border="none"/>
      <style:text-properties/>
    </style:style>
    <style:style style:family="text" style:name="T995">
      <style:text-properties fo:color="#1f1f1f" fo:font-family="Arial" style:font-family-asian="Arial" style:font-family-complex="Arial" fo:font-size="12pt"/>
    </style:style>
    <style:style style:parent-style-name="142" style:family="paragraph" style:name="P53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96">
      <style:text-properties fo:color="#1f1f1f" fo:font-family="Arial" style:font-family-asian="Arial" style:font-family-complex="Arial" fo:font-size="12pt" fo:font-weight="bold"/>
    </style:style>
    <style:style style:family="paragraph" style:name="P538">
      <style:paragraph-properties fo:line-height="115%" fo:margin-left="0cm" fo:margin-right="0cm" fo:text-indent="0cm" fo:margin-top="0pt" fo:margin-bottom="0pt" fo:border="none"/>
      <style:text-properties/>
    </style:style>
    <style:style style:family="text" style:name="T997">
      <style:text-properties fo:color="#1f1f1f" fo:font-family="Arial" style:font-family-asian="Arial" style:font-family-complex="Arial" fo:font-size="12pt"/>
    </style:style>
    <style:style style:parent-style-name="142" style:family="paragraph" style:name="P53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998">
      <style:text-properties fo:color="#1f1f1f" fo:font-family="Arial" style:font-family-asian="Arial" style:font-family-complex="Arial" fo:font-size="12pt" fo:font-weight="bold"/>
    </style:style>
    <style:style style:family="paragraph" style:name="P540">
      <style:paragraph-properties fo:line-height="115%" fo:margin-left="0cm" fo:margin-right="0cm" fo:text-indent="0cm" fo:margin-top="0pt" fo:margin-bottom="0pt" fo:border="none"/>
      <style:text-properties/>
    </style:style>
    <style:style style:family="text" style:name="T999">
      <style:text-properties fo:color="#1f1f1f" fo:font-family="Arial" style:font-family-asian="Arial" style:font-family-complex="Arial" fo:font-size="12pt"/>
    </style:style>
    <style:style style:parent-style-name="142" style:family="paragraph" style:name="P54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00">
      <style:text-properties fo:color="#1f1f1f" fo:font-family="Arial" style:font-family-asian="Arial" style:font-family-complex="Arial" fo:font-size="12pt" fo:font-weight="bold"/>
    </style:style>
    <style:style style:family="paragraph" style:name="P542">
      <style:paragraph-properties fo:line-height="115%" fo:margin-left="0cm" fo:margin-right="0cm" fo:text-indent="0cm" fo:margin-top="0pt" fo:margin-bottom="0pt" fo:border="none"/>
      <style:text-properties/>
    </style:style>
    <style:style style:family="text" style:name="T1001">
      <style:text-properties fo:color="#1f1f1f" fo:font-family="Arial" style:font-family-asian="Arial" style:font-family-complex="Arial" fo:font-size="12pt"/>
    </style:style>
    <style:style style:family="text" style:name="T1002">
      <style:text-properties fo:color="#1f1f1f" fo:font-family="Arial" style:font-family-asian="Arial" style:font-family-complex="Arial" fo:font-size="12pt"/>
    </style:style>
    <style:style style:parent-style-name="142" style:family="paragraph" style:name="P54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03">
      <style:text-properties fo:color="#1f1f1f" fo:font-family="Arial" style:font-family-asian="Arial" style:font-family-complex="Arial" fo:font-size="12pt" fo:font-weight="bold"/>
    </style:style>
    <style:style style:family="paragraph" style:name="P544">
      <style:paragraph-properties fo:line-height="115%" fo:margin-left="0cm" fo:margin-right="0cm" fo:text-indent="0cm" fo:margin-top="0pt" fo:margin-bottom="0pt" fo:border="none"/>
      <style:text-properties/>
    </style:style>
    <style:style style:family="text" style:name="T1004">
      <style:text-properties fo:color="#1f1f1f" fo:font-family="Arial" style:font-family-asian="Arial" style:font-family-complex="Arial" fo:font-size="12pt"/>
    </style:style>
    <style:style style:parent-style-name="141" style:family="paragraph" style:name="P54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05">
      <style:text-properties fo:color="#1f1f1f" fo:font-family="Arial" style:font-family-asian="Arial" style:font-family-complex="Arial" fo:font-size="14pt" fo:font-weight="bold"/>
    </style:style>
    <style:style style:parent-style-name="668" style:list-style-name="WWNum30" style:family="paragraph" style:name="P546">
      <style:paragraph-properties fo:line-height="115%" fo:margin-right="0cm" fo:margin-top="0pt" fo:margin-bottom="0pt" fo:border="none"/>
      <style:text-properties/>
    </style:style>
    <style:style style:family="text" style:name="T1006">
      <style:text-properties fo:color="#1f1f1f" fo:font-family="Arial" style:font-family-asian="Arial" style:font-family-complex="Arial" fo:font-size="12pt"/>
    </style:style>
    <style:style style:parent-style-name="668" style:list-style-name="WWNum30" style:family="paragraph" style:name="P547">
      <style:paragraph-properties fo:line-height="115%" fo:margin-right="0cm" fo:margin-top="0pt" fo:margin-bottom="0pt" fo:border="none"/>
      <style:text-properties/>
    </style:style>
    <style:style style:family="text" style:name="T1007">
      <style:text-properties fo:color="#1f1f1f" fo:font-family="Arial" style:font-family-asian="Arial" style:font-family-complex="Arial" fo:font-size="12pt"/>
    </style:style>
    <style:style style:parent-style-name="668" style:list-style-name="WWNum30" style:family="paragraph" style:name="P548">
      <style:paragraph-properties fo:line-height="115%" fo:margin-right="0cm" fo:margin-top="0pt" fo:margin-bottom="0pt" fo:border="none"/>
      <style:text-properties/>
    </style:style>
    <style:style style:family="text" style:name="T1008">
      <style:text-properties fo:color="#1f1f1f" fo:font-family="Arial" style:font-family-asian="Arial" style:font-family-complex="Arial" fo:font-size="12pt"/>
    </style:style>
    <style:style style:parent-style-name="668" style:list-style-name="WWNum30" style:family="paragraph" style:name="P549">
      <style:paragraph-properties fo:line-height="115%" fo:margin-right="0cm" fo:margin-top="0pt" fo:margin-bottom="0pt" fo:border="none"/>
      <style:text-properties/>
    </style:style>
    <style:style style:family="text" style:name="T1009">
      <style:text-properties fo:color="#1f1f1f" fo:font-family="Arial" style:font-family-asian="Arial" style:font-family-complex="Arial" fo:font-size="12pt"/>
    </style:style>
    <style:style style:family="paragraph" style:name="P550">
      <style:paragraph-properties/>
      <style:text-properties/>
    </style:style>
    <style:style style:parent-style-name="141" style:family="paragraph" style:name="P551">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10">
      <style:text-properties fo:color="#1f1f1f" fo:font-family="Arial" style:font-family-asian="Arial" style:font-family-complex="Arial" fo:font-size="14pt" fo:font-weight="bold"/>
    </style:style>
    <style:style style:family="paragraph" style:name="P552">
      <style:paragraph-properties fo:line-height="115%" fo:margin-left="0cm" fo:margin-right="0cm" fo:text-indent="0cm" fo:margin-top="0pt" fo:margin-bottom="0pt" fo:border="none"/>
      <style:text-properties/>
    </style:style>
    <style:style style:family="text" style:name="T1011">
      <style:text-properties fo:color="#1f1f1f" fo:font-family="Arial" style:font-family-asian="Arial" style:font-family-complex="Arial" fo:font-size="12pt"/>
    </style:style>
    <style:style style:family="paragraph" style:name="P553">
      <style:paragraph-properties fo:line-height="115%" fo:margin-left="0cm" fo:margin-right="0cm" fo:text-indent="0cm" fo:margin-top="0pt" fo:margin-bottom="0pt" fo:border="none"/>
      <style:text-properties/>
    </style:style>
    <style:style style:family="text" style:name="T1012">
      <style:text-properties fo:color="#1f1f1f" fo:font-family="Arial" style:font-family-asian="Arial" style:font-family-complex="Arial" fo:font-size="12pt"/>
    </style:style>
    <style:style style:family="paragraph" style:name="P554">
      <style:paragraph-properties fo:line-height="115%" fo:margin-left="0cm" fo:margin-right="0cm" fo:text-indent="0cm" fo:margin-top="0pt" fo:margin-bottom="0pt" fo:border="none"/>
      <style:text-properties/>
    </style:style>
    <style:style style:family="text" style:name="T1013">
      <style:text-properties fo:color="#1f1f1f" fo:font-family="Arial" style:font-family-asian="Arial" style:font-family-complex="Arial" fo:font-size="12pt"/>
    </style:style>
    <style:style style:family="paragraph" style:name="P555">
      <style:paragraph-properties fo:line-height="115%" fo:margin-left="0cm" fo:margin-right="0cm" fo:text-indent="0cm" fo:margin-top="0pt" fo:margin-bottom="0pt" fo:border="none"/>
      <style:text-properties/>
    </style:style>
    <style:style style:family="text" style:name="T1014">
      <style:text-properties fo:color="#1f1f1f" fo:font-family="Arial" style:font-family-asian="Arial" style:font-family-complex="Arial" fo:font-size="12pt"/>
    </style:style>
    <style:style style:family="paragraph" style:name="P556">
      <style:paragraph-properties fo:line-height="115%" fo:margin-left="0cm" fo:margin-right="0cm" fo:text-indent="0cm" fo:margin-top="0pt" fo:margin-bottom="0pt" fo:border="none"/>
      <style:text-properties/>
    </style:style>
    <style:style style:family="text" style:name="T1015">
      <style:text-properties fo:color="#1f1f1f" fo:font-family="Arial" style:font-family-asian="Arial" style:font-family-complex="Arial" fo:font-size="12pt"/>
    </style:style>
    <style:style style:parent-style-name="141" style:family="paragraph" style:name="P55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16">
      <style:text-properties fo:color="#1f1f1f" fo:font-family="Arial" style:font-family-asian="Arial" style:font-family-complex="Arial" fo:font-size="14pt" fo:font-weight="bold"/>
    </style:style>
    <style:style style:parent-style-name="668" style:list-style-name="WWNum31" style:family="paragraph" style:name="P558">
      <style:paragraph-properties fo:line-height="115%" fo:margin-right="0cm" fo:margin-top="0pt" fo:margin-bottom="0pt" fo:border="none"/>
      <style:text-properties/>
    </style:style>
    <style:style style:family="text" style:name="T1017">
      <style:text-properties fo:color="#1f1f1f" fo:font-family="Arial" style:font-family-asian="Arial" style:font-family-complex="Arial" fo:font-size="12pt"/>
    </style:style>
    <style:style style:parent-style-name="668" style:list-style-name="WWNum31" style:family="paragraph" style:name="P559">
      <style:paragraph-properties fo:line-height="115%" fo:margin-right="0cm" fo:margin-top="0pt" fo:margin-bottom="0pt" fo:border="none"/>
      <style:text-properties/>
    </style:style>
    <style:style style:family="text" style:name="T1018">
      <style:text-properties fo:color="#1f1f1f" fo:font-family="Arial" style:font-family-asian="Arial" style:font-family-complex="Arial" fo:font-size="12pt"/>
    </style:style>
    <style:style style:parent-style-name="668" style:list-style-name="WWNum31" style:family="paragraph" style:name="P560">
      <style:paragraph-properties fo:line-height="115%" fo:margin-right="0cm" fo:margin-top="0pt" fo:margin-bottom="0pt" fo:border="none"/>
      <style:text-properties/>
    </style:style>
    <style:style style:family="text" style:name="T1019">
      <style:text-properties fo:color="#1f1f1f" fo:font-family="Arial" style:font-family-asian="Arial" style:font-family-complex="Arial" fo:font-size="12pt"/>
    </style:style>
    <style:style style:parent-style-name="668" style:list-style-name="WWNum31" style:family="paragraph" style:name="P561">
      <style:paragraph-properties fo:line-height="115%" fo:margin-right="0cm" fo:margin-top="0pt" fo:margin-bottom="0pt" fo:border="none"/>
      <style:text-properties/>
    </style:style>
    <style:style style:family="text" style:name="T1020">
      <style:text-properties fo:color="#1f1f1f" fo:font-family="Arial" style:font-family-asian="Arial" style:font-family-complex="Arial" fo:font-size="12pt"/>
    </style:style>
    <style:style style:family="paragraph" style:name="P562">
      <style:paragraph-properties/>
      <style:text-properties/>
    </style:style>
    <style:style style:parent-style-name="141" style:family="paragraph" style:name="P56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21">
      <style:text-properties fo:color="#1f1f1f" fo:font-family="Arial" style:font-family-asian="Arial" style:font-family-complex="Arial" fo:font-size="14pt" fo:font-weight="bold"/>
    </style:style>
    <style:style style:family="paragraph" style:name="P564">
      <style:paragraph-properties fo:line-height="115%" fo:margin-left="0cm" fo:margin-right="0cm" fo:text-indent="0cm" fo:margin-top="0pt" fo:margin-bottom="0pt" fo:border="none"/>
      <style:text-properties/>
    </style:style>
    <style:style style:family="text" style:name="T1022">
      <style:text-properties fo:color="#1f1f1f" fo:font-family="Arial" style:font-family-asian="Arial" style:font-family-complex="Arial" fo:font-size="12pt"/>
    </style:style>
    <style:style style:parent-style-name="142" style:family="paragraph" style:name="P56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23">
      <style:text-properties fo:color="#1f1f1f" fo:font-family="Arial" style:font-family-asian="Arial" style:font-family-complex="Arial" fo:font-size="12pt" fo:font-weight="bold"/>
    </style:style>
    <style:style style:parent-style-name="668" style:list-style-name="WWNum32" style:family="paragraph" style:name="P566">
      <style:paragraph-properties fo:line-height="115%" fo:margin-right="0cm" fo:margin-top="0pt" fo:margin-bottom="0pt" fo:border="none"/>
      <style:text-properties/>
    </style:style>
    <style:style style:family="text" style:name="T1024">
      <style:text-properties fo:color="#1f1f1f" fo:font-family="Arial" style:font-family-asian="Arial" style:font-family-complex="Arial" fo:font-size="12pt"/>
    </style:style>
    <style:style style:parent-style-name="668" style:list-style-name="WWNum32" style:family="paragraph" style:name="P567">
      <style:paragraph-properties fo:line-height="115%" fo:margin-right="0cm" fo:margin-top="0pt" fo:margin-bottom="0pt" fo:border="none"/>
      <style:text-properties/>
    </style:style>
    <style:style style:family="text" style:name="T1025">
      <style:text-properties fo:color="#1f1f1f" fo:font-family="Arial" style:font-family-asian="Arial" style:font-family-complex="Arial" fo:font-size="12pt"/>
    </style:style>
    <style:style style:parent-style-name="668" style:list-style-name="WWNum32" style:family="paragraph" style:name="P568">
      <style:paragraph-properties fo:line-height="115%" fo:margin-right="0cm" fo:margin-top="0pt" fo:margin-bottom="0pt" fo:border="none"/>
      <style:text-properties/>
    </style:style>
    <style:style style:family="text" style:name="T1026">
      <style:text-properties fo:color="#1f1f1f" fo:font-family="Arial" style:font-family-asian="Arial" style:font-family-complex="Arial" fo:font-size="12pt"/>
    </style:style>
    <style:style style:parent-style-name="142" style:family="paragraph" style:name="P56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27">
      <style:text-properties fo:color="#1f1f1f" fo:font-family="Arial" style:font-family-asian="Arial" style:font-family-complex="Arial" fo:font-size="12pt" fo:font-weight="bold"/>
    </style:style>
    <style:style style:family="paragraph" style:name="P570">
      <style:paragraph-properties fo:line-height="115%" fo:margin-left="0cm" fo:margin-right="0cm" fo:text-indent="0cm" fo:margin-top="0pt" fo:margin-bottom="0pt" fo:border="none"/>
      <style:text-properties/>
    </style:style>
    <style:style style:family="text" style:name="T1028">
      <style:text-properties fo:color="#1f1f1f" fo:font-family="Arial" style:font-family-asian="Arial" style:font-family-complex="Arial" fo:font-size="12pt"/>
    </style:style>
    <style:style style:parent-style-name="142" style:family="paragraph" style:name="P57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29">
      <style:text-properties fo:color="#1f1f1f" fo:font-family="Arial" style:font-family-asian="Arial" style:font-family-complex="Arial" fo:font-size="12pt" fo:font-weight="bold"/>
    </style:style>
    <style:style style:family="paragraph" style:name="P572">
      <style:paragraph-properties fo:line-height="115%" fo:margin-left="0cm" fo:margin-right="0cm" fo:text-indent="0cm" fo:margin-top="0pt" fo:margin-bottom="0pt" fo:background-color="#000000" fo:border="none"/>
      <style:text-properties/>
    </style:style>
    <style:style style:family="text" style:name="T1030">
      <style:text-properties fo:color="#ffffff" fo:font-family="Arial" style:font-family-asian="Arial" style:font-family-complex="Arial" fo:font-size="10.5pt"/>
    </style:style>
    <style:style style:family="paragraph" style:name="P573">
      <style:paragraph-properties fo:line-height="115%" fo:margin-left="0cm" fo:margin-right="0cm" fo:text-indent="0cm" fo:margin-top="0pt" fo:margin-bottom="0pt" fo:background-color="#000000" fo:border="none"/>
      <style:text-properties/>
    </style:style>
    <style:style style:family="text" style:name="T1031">
      <style:text-properties fo:color="#ffffff" fo:font-family="Arial" style:font-family-asian="Arial" style:font-family-complex="Arial" fo:font-size="10.5pt"/>
    </style:style>
    <style:style style:family="paragraph" style:name="P574">
      <style:paragraph-properties fo:line-height="115%" fo:margin-left="0cm" fo:margin-right="0cm" fo:text-indent="0cm" fo:margin-top="0pt" fo:margin-bottom="0pt" fo:background-color="#000000" fo:border="none"/>
      <style:text-properties/>
    </style:style>
    <style:style style:family="text" style:name="T1032">
      <style:text-properties fo:font-family="Arial" style:font-family-asian="Arial" style:font-family-complex="Arial" fo:font-size="12pt"/>
    </style:style>
    <style:style style:family="paragraph" style:name="P575">
      <style:paragraph-properties fo:line-height="115%" fo:margin-left="0cm" fo:margin-right="0cm" fo:text-indent="0cm" fo:margin-top="0pt" fo:margin-bottom="0pt" fo:border="none"/>
      <style:text-properties/>
    </style:style>
    <style:style style:family="text" style:name="T1033">
      <style:text-properties fo:color="#1f1f1f" fo:font-family="Arial" style:font-family-asian="Arial" style:font-family-complex="Arial" fo:font-size="12pt"/>
    </style:style>
    <style:style style:parent-style-name="142" style:family="paragraph" style:name="P57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34">
      <style:text-properties fo:color="#1f1f1f" fo:font-family="Arial" style:font-family-asian="Arial" style:font-family-complex="Arial" fo:font-size="12pt" fo:font-weight="bold"/>
    </style:style>
    <style:style style:parent-style-name="668" style:list-style-name="WWNum32" style:family="paragraph" style:name="P577">
      <style:paragraph-properties fo:line-height="115%" fo:margin-right="0cm" fo:margin-top="0pt" fo:margin-bottom="0pt" fo:border="none"/>
      <style:text-properties/>
    </style:style>
    <style:style style:family="text" style:name="T1035">
      <style:text-properties fo:color="#1f1f1f" fo:font-family="Arial" style:font-family-asian="Arial" style:font-family-complex="Arial" fo:font-size="12pt"/>
    </style:style>
    <style:style style:parent-style-name="668" style:list-style-name="WWNum32" style:family="paragraph" style:name="P578">
      <style:paragraph-properties fo:line-height="115%" fo:margin-right="0cm" fo:margin-top="0pt" fo:margin-bottom="0pt" fo:border="none"/>
      <style:text-properties/>
    </style:style>
    <style:style style:family="text" style:name="T1036">
      <style:text-properties fo:color="#1f1f1f" fo:font-family="Arial" style:font-family-asian="Arial" style:font-family-complex="Arial" fo:font-size="12pt"/>
    </style:style>
    <style:style style:parent-style-name="668" style:list-style-name="WWNum32" style:family="paragraph" style:name="P579">
      <style:paragraph-properties fo:line-height="115%" fo:margin-right="0cm" fo:margin-top="0pt" fo:margin-bottom="0pt" fo:border="none"/>
      <style:text-properties/>
    </style:style>
    <style:style style:family="text" style:name="T1037">
      <style:text-properties fo:color="#1f1f1f" fo:font-family="Arial" style:font-family-asian="Arial" style:font-family-complex="Arial" fo:font-size="12pt"/>
    </style:style>
    <style:style style:parent-style-name="141" style:family="paragraph" style:name="P58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38">
      <style:text-properties fo:color="#1f1f1f" fo:font-family="Arial" style:font-family-asian="Arial" style:font-family-complex="Arial" fo:font-size="14pt" fo:font-weight="bold"/>
    </style:style>
    <style:style style:parent-style-name="668" style:list-style-name="WWNum32" style:family="paragraph" style:name="P581">
      <style:paragraph-properties fo:line-height="115%" fo:margin-right="0cm" fo:margin-top="0pt" fo:margin-bottom="0pt" fo:border="none"/>
      <style:text-properties/>
    </style:style>
    <style:style style:family="text" style:name="T1039">
      <style:text-properties fo:color="#1f1f1f" fo:font-family="Arial" style:font-family-asian="Arial" style:font-family-complex="Arial" fo:font-size="12pt"/>
    </style:style>
    <style:style style:parent-style-name="668" style:list-style-name="WWNum32" style:family="paragraph" style:name="P582">
      <style:paragraph-properties fo:line-height="115%" fo:margin-right="0cm" fo:margin-top="0pt" fo:margin-bottom="0pt" fo:border="none"/>
      <style:text-properties/>
    </style:style>
    <style:style style:family="text" style:name="T1040">
      <style:text-properties fo:color="#1f1f1f" fo:font-family="Arial" style:font-family-asian="Arial" style:font-family-complex="Arial" fo:font-size="12pt"/>
    </style:style>
    <style:style style:parent-style-name="668" style:list-style-name="WWNum32" style:family="paragraph" style:name="P583">
      <style:paragraph-properties fo:line-height="115%" fo:margin-right="0cm" fo:margin-top="0pt" fo:margin-bottom="0pt" fo:border="none"/>
      <style:text-properties/>
    </style:style>
    <style:style style:family="text" style:name="T1041">
      <style:text-properties fo:color="#1f1f1f" fo:font-family="Arial" style:font-family-asian="Arial" style:font-family-complex="Arial" fo:font-size="12pt"/>
    </style:style>
    <style:style style:parent-style-name="668" style:list-style-name="WWNum32" style:family="paragraph" style:name="P584">
      <style:paragraph-properties fo:line-height="115%" fo:margin-right="0cm" fo:margin-top="0pt" fo:margin-bottom="0pt" fo:border="none"/>
      <style:text-properties/>
    </style:style>
    <style:style style:family="text" style:name="T1042">
      <style:text-properties fo:color="#1f1f1f" fo:font-family="Arial" style:font-family-asian="Arial" style:font-family-complex="Arial" fo:font-size="12pt"/>
    </style:style>
    <style:style style:family="paragraph" style:name="P585">
      <style:paragraph-properties/>
      <style:text-properties/>
    </style:style>
    <style:style style:family="paragraph" style:name="P586">
      <style:paragraph-properties fo:line-height="115%" fo:margin-left="0cm" fo:margin-right="0cm" fo:text-indent="0cm" fo:margin-top="0pt" fo:margin-bottom="0pt" fo:break-before="page" fo:border="none"/>
      <style:text-properties/>
    </style:style>
    <style:style style:family="text" style:name="T1043">
      <style:text-properties fo:color="#1f1f1f" fo:font-family="Arial" style:font-family-asian="Arial" style:font-family-complex="Arial" fo:font-size="12pt"/>
    </style:style>
    <style:style style:parent-style-name="141" style:family="paragraph" style:name="P58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44">
      <style:text-properties fo:color="#1f1f1f" fo:font-family="Arial" style:font-family-asian="Arial" style:font-family-complex="Arial" fo:font-size="14pt" fo:font-weight="bold"/>
    </style:style>
    <style:style style:family="paragraph" style:name="P588">
      <style:paragraph-properties fo:line-height="115%" fo:margin-left="0cm" fo:margin-right="0cm" fo:text-indent="0cm" fo:margin-top="0pt" fo:margin-bottom="0pt" fo:border="none"/>
      <style:text-properties/>
    </style:style>
    <style:style style:family="text" style:name="T1045">
      <style:text-properties fo:color="#1f1f1f" fo:font-family="Arial" style:font-family-asian="Arial" style:font-family-complex="Arial" fo:font-size="12pt"/>
    </style:style>
    <style:style style:parent-style-name="142" style:family="paragraph" style:name="P58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46">
      <style:text-properties fo:color="#1f1f1f" fo:font-family="Arial" style:font-family-asian="Arial" style:font-family-complex="Arial" fo:font-size="12pt" fo:font-weight="bold"/>
    </style:style>
    <style:style style:family="paragraph" style:name="P590">
      <style:paragraph-properties fo:line-height="115%" fo:margin-left="0cm" fo:margin-right="0cm" fo:text-indent="0cm" fo:margin-top="0pt" fo:margin-bottom="0pt" fo:border="none"/>
      <style:text-properties/>
    </style:style>
    <style:style style:family="text" style:name="T1047">
      <style:text-properties fo:color="#1f1f1f" fo:font-family="Arial" style:font-family-asian="Arial" style:font-family-complex="Arial" fo:font-size="12pt"/>
    </style:style>
    <style:style style:parent-style-name="142" style:family="paragraph" style:name="P59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48">
      <style:text-properties fo:color="#1f1f1f" fo:font-family="Arial" style:font-family-asian="Arial" style:font-family-complex="Arial" fo:font-size="12pt" fo:font-weight="bold"/>
    </style:style>
    <style:style style:family="paragraph" style:name="P592">
      <style:paragraph-properties fo:line-height="115%" fo:margin-left="0cm" fo:margin-right="0cm" fo:text-indent="0cm" fo:margin-top="0pt" fo:margin-bottom="0pt" fo:border="none"/>
      <style:text-properties/>
    </style:style>
    <style:style style:family="text" style:name="T1049">
      <style:text-properties fo:color="#1f1f1f" fo:font-family="Arial" style:font-family-asian="Arial" style:font-family-complex="Arial" fo:font-size="12pt"/>
    </style:style>
    <style:style style:parent-style-name="142" style:family="paragraph" style:name="P59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50">
      <style:text-properties fo:color="#1f1f1f" fo:font-family="Arial" style:font-family-asian="Arial" style:font-family-complex="Arial" fo:font-size="12pt" fo:font-weight="bold"/>
    </style:style>
    <style:style style:family="paragraph" style:name="P594">
      <style:paragraph-properties fo:line-height="115%" fo:margin-left="0cm" fo:margin-right="0cm" fo:text-indent="0cm" fo:margin-top="0pt" fo:margin-bottom="0pt" fo:border="none"/>
      <style:text-properties/>
    </style:style>
    <style:style style:family="text" style:name="T1051">
      <style:text-properties fo:color="#1f1f1f" fo:font-family="Arial" style:font-family-asian="Arial" style:font-family-complex="Arial" fo:font-size="12pt"/>
    </style:style>
    <style:style style:parent-style-name="142" style:family="paragraph" style:name="P59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52">
      <style:text-properties fo:color="#1f1f1f" fo:font-family="Arial" style:font-family-asian="Arial" style:font-family-complex="Arial" fo:font-size="12pt" fo:font-weight="bold"/>
    </style:style>
    <style:style style:family="paragraph" style:name="P596">
      <style:paragraph-properties fo:line-height="115%" fo:margin-left="0cm" fo:margin-right="0cm" fo:text-indent="0cm" fo:margin-top="0pt" fo:margin-bottom="0pt" fo:border="none"/>
      <style:text-properties/>
    </style:style>
    <style:style style:family="text" style:name="T1053">
      <style:text-properties fo:color="#1f1f1f" fo:font-family="Arial" style:font-family-asian="Arial" style:font-family-complex="Arial" fo:font-size="12pt"/>
    </style:style>
    <style:style style:parent-style-name="141" style:family="paragraph" style:name="P59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54">
      <style:text-properties fo:color="#1f1f1f" fo:font-family="Arial" style:font-family-asian="Arial" style:font-family-complex="Arial" fo:font-size="14pt" fo:font-weight="bold"/>
    </style:style>
    <style:style style:parent-style-name="668" style:list-style-name="WWNum33" style:family="paragraph" style:name="P598">
      <style:paragraph-properties fo:line-height="115%" fo:margin-right="0cm" fo:margin-top="0pt" fo:margin-bottom="0pt" fo:border="none"/>
      <style:text-properties/>
    </style:style>
    <style:style style:family="text" style:name="T1055">
      <style:text-properties fo:color="#1f1f1f" fo:font-family="Arial" style:font-family-asian="Arial" style:font-family-complex="Arial" fo:font-size="12pt"/>
    </style:style>
    <style:style style:parent-style-name="668" style:list-style-name="WWNum33" style:family="paragraph" style:name="P599">
      <style:paragraph-properties fo:line-height="115%" fo:margin-right="0cm" fo:margin-top="0pt" fo:margin-bottom="0pt" fo:border="none"/>
      <style:text-properties/>
    </style:style>
    <style:style style:family="text" style:name="T1056">
      <style:text-properties fo:color="#1f1f1f" fo:font-family="Arial" style:font-family-asian="Arial" style:font-family-complex="Arial" fo:font-size="12pt"/>
    </style:style>
    <style:style style:parent-style-name="668" style:list-style-name="WWNum33" style:family="paragraph" style:name="P600">
      <style:paragraph-properties fo:line-height="115%" fo:margin-right="0cm" fo:margin-top="0pt" fo:margin-bottom="0pt" fo:border="none"/>
      <style:text-properties/>
    </style:style>
    <style:style style:family="text" style:name="T1057">
      <style:text-properties fo:color="#1f1f1f" fo:font-family="Arial" style:font-family-asian="Arial" style:font-family-complex="Arial" fo:font-size="12pt"/>
    </style:style>
    <style:style style:parent-style-name="668" style:list-style-name="WWNum33" style:family="paragraph" style:name="P601">
      <style:paragraph-properties fo:line-height="115%" fo:margin-right="0cm" fo:margin-top="0pt" fo:margin-bottom="0pt" fo:border="none"/>
      <style:text-properties/>
    </style:style>
    <style:style style:family="text" style:name="T1058">
      <style:text-properties fo:color="#1f1f1f" fo:font-family="Arial" style:font-family-asian="Arial" style:font-family-complex="Arial" fo:font-size="12pt"/>
    </style:style>
    <style:style style:family="paragraph" style:name="P602">
      <style:paragraph-properties/>
      <style:text-properties/>
    </style:style>
    <style:style style:parent-style-name="141" style:family="paragraph" style:name="P603">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059">
      <style:text-properties fo:color="#1f1f1f" fo:font-family="Arial" style:font-family-asian="Arial" style:font-family-complex="Arial" fo:font-size="14pt" fo:font-weight="bold"/>
    </style:style>
    <style:style style:family="paragraph" style:name="P604">
      <style:paragraph-properties fo:line-height="115%" fo:margin-left="0cm" fo:margin-right="0cm" fo:text-indent="0cm" fo:margin-top="0pt" fo:margin-bottom="0pt" fo:border="none"/>
      <style:text-properties/>
    </style:style>
    <style:style style:family="text" style:name="T1060">
      <style:text-properties fo:color="#1f1f1f" fo:font-family="Arial" style:font-family-asian="Arial" style:font-family-complex="Arial" fo:font-size="12pt"/>
    </style:style>
    <style:style style:parent-style-name="142" style:family="paragraph" style:name="P60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61">
      <style:text-properties fo:color="#1f1f1f" fo:font-family="Arial" style:font-family-asian="Arial" style:font-family-complex="Arial" fo:font-size="12pt" fo:font-weight="bold"/>
    </style:style>
    <style:style style:family="paragraph" style:name="P606">
      <style:paragraph-properties fo:line-height="115%" fo:margin-left="0cm" fo:margin-right="0cm" fo:text-indent="0cm" fo:margin-top="0pt" fo:margin-bottom="0pt" fo:border="none"/>
      <style:text-properties/>
    </style:style>
    <style:style style:family="text" style:name="T1062">
      <style:text-properties fo:color="#1f1f1f" fo:font-family="Arial" style:font-family-asian="Arial" style:font-family-complex="Arial" fo:font-size="12pt"/>
    </style:style>
    <style:style style:family="text" style:name="T1063">
      <style:text-properties fo:color="#1f1f1f" fo:font-family="Arial" style:font-family-asian="Arial" style:font-family-complex="Arial" fo:font-size="12pt" fo:font-weight="bold"/>
    </style:style>
    <style:style style:family="text" style:name="T1064">
      <style:text-properties fo:color="#1f1f1f" fo:font-family="Arial" style:font-family-asian="Arial" style:font-family-complex="Arial" fo:font-size="12pt"/>
    </style:style>
    <style:style style:parent-style-name="142" style:family="paragraph" style:name="P60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65">
      <style:text-properties fo:color="#1f1f1f" fo:font-family="Arial" style:font-family-asian="Arial" style:font-family-complex="Arial" fo:font-size="12pt" fo:font-weight="bold"/>
    </style:style>
    <style:style style:family="paragraph" style:name="P608">
      <style:paragraph-properties fo:line-height="115%" fo:margin-left="0cm" fo:margin-right="0cm" fo:text-indent="0cm" fo:margin-top="0pt" fo:margin-bottom="0pt" fo:border="none"/>
      <style:text-properties/>
    </style:style>
    <style:style style:family="text" style:name="T1066">
      <style:text-properties fo:color="#1f1f1f" fo:font-family="Arial" style:font-family-asian="Arial" style:font-family-complex="Arial" fo:font-size="12pt"/>
    </style:style>
    <style:style style:parent-style-name="142" style:family="paragraph" style:name="P60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67">
      <style:text-properties fo:color="#1f1f1f" fo:font-family="Arial" style:font-family-asian="Arial" style:font-family-complex="Arial" fo:font-size="12pt" fo:font-weight="bold"/>
    </style:style>
    <style:style style:family="paragraph" style:name="P610">
      <style:paragraph-properties fo:line-height="115%" fo:margin-left="0cm" fo:margin-right="0cm" fo:text-indent="0cm" fo:margin-top="0pt" fo:margin-bottom="0pt" fo:border="none"/>
      <style:text-properties/>
    </style:style>
    <style:style style:family="text" style:name="T1068">
      <style:text-properties fo:color="#1f1f1f" fo:font-family="Arial" style:font-family-asian="Arial" style:font-family-complex="Arial" fo:font-size="12pt"/>
    </style:style>
    <style:style style:parent-style-name="142" style:family="paragraph" style:name="P61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69">
      <style:text-properties fo:color="#1f1f1f" fo:font-family="Arial" style:font-family-asian="Arial" style:font-family-complex="Arial" fo:font-size="12pt" fo:font-weight="bold"/>
    </style:style>
    <style:style style:family="paragraph" style:name="P612">
      <style:paragraph-properties fo:line-height="115%" fo:margin-left="0cm" fo:margin-right="0cm" fo:text-indent="0cm" fo:margin-top="0pt" fo:margin-bottom="0pt" fo:border="none"/>
      <style:text-properties/>
    </style:style>
    <style:style style:family="text" style:name="T1070">
      <style:text-properties fo:color="#1f1f1f" fo:font-family="Arial" style:font-family-asian="Arial" style:font-family-complex="Arial" fo:font-size="12pt"/>
    </style:style>
    <style:style style:parent-style-name="141" style:family="paragraph" style:name="P613">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71">
      <style:text-properties fo:color="#1f1f1f" fo:font-family="Arial" style:font-family-asian="Arial" style:font-family-complex="Arial" fo:font-size="14pt" fo:font-weight="bold"/>
    </style:style>
    <style:style style:parent-style-name="668" style:list-style-name="WWNum34" style:family="paragraph" style:name="P614">
      <style:paragraph-properties fo:line-height="115%" fo:margin-right="0cm" fo:margin-top="0pt" fo:margin-bottom="0pt" fo:border="none"/>
      <style:text-properties/>
    </style:style>
    <style:style style:family="text" style:name="T1072">
      <style:text-properties fo:color="#1f1f1f" fo:font-family="Arial" style:font-family-asian="Arial" style:font-family-complex="Arial" fo:font-size="12pt"/>
    </style:style>
    <style:style style:parent-style-name="668" style:list-style-name="WWNum34" style:family="paragraph" style:name="P615">
      <style:paragraph-properties fo:line-height="115%" fo:margin-right="0cm" fo:margin-top="0pt" fo:margin-bottom="0pt" fo:border="none"/>
      <style:text-properties/>
    </style:style>
    <style:style style:family="text" style:name="T1073">
      <style:text-properties fo:color="#1f1f1f" fo:font-family="Arial" style:font-family-asian="Arial" style:font-family-complex="Arial" fo:font-size="12pt"/>
    </style:style>
    <style:style style:parent-style-name="668" style:list-style-name="WWNum34" style:family="paragraph" style:name="P616">
      <style:paragraph-properties fo:line-height="115%" fo:margin-right="0cm" fo:margin-top="0pt" fo:margin-bottom="0pt" fo:border="none"/>
      <style:text-properties/>
    </style:style>
    <style:style style:family="text" style:name="T1074">
      <style:text-properties fo:color="#1f1f1f" fo:font-family="Arial" style:font-family-asian="Arial" style:font-family-complex="Arial" fo:font-size="12pt"/>
    </style:style>
    <style:style style:parent-style-name="668" style:list-style-name="WWNum34" style:family="paragraph" style:name="P617">
      <style:paragraph-properties fo:line-height="115%" fo:margin-right="0cm" fo:margin-top="0pt" fo:margin-bottom="0pt" fo:border="none"/>
      <style:text-properties/>
    </style:style>
    <style:style style:family="text" style:name="T1075">
      <style:text-properties fo:color="#1f1f1f" fo:font-family="Arial" style:font-family-asian="Arial" style:font-family-complex="Arial" fo:font-size="12pt"/>
    </style:style>
    <style:style style:family="paragraph" style:name="P618">
      <style:paragraph-properties/>
      <style:text-properties/>
    </style:style>
    <style:style style:family="paragraph" style:name="P619">
      <style:paragraph-properties fo:line-height="115%" fo:margin-left="0cm" fo:margin-right="0cm" fo:text-indent="0cm" fo:margin-top="0pt" fo:margin-bottom="0pt" fo:break-before="page" fo:border="none"/>
      <style:text-properties/>
    </style:style>
    <style:style style:family="text" style:name="T1076">
      <style:text-properties fo:color="#1f1f1f" fo:font-family="Arial" style:font-family-asian="Arial" style:font-family-complex="Arial" fo:font-size="12pt"/>
    </style:style>
    <style:style style:parent-style-name="141" style:family="paragraph" style:name="P62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77">
      <style:text-properties fo:color="#1f1f1f" fo:font-family="Arial" style:font-family-asian="Arial" style:font-family-complex="Arial" fo:font-size="14pt" fo:font-weight="bold"/>
    </style:style>
    <style:style style:family="paragraph" style:name="P621">
      <style:paragraph-properties fo:line-height="115%" fo:margin-left="0cm" fo:margin-right="0cm" fo:text-indent="0cm" fo:margin-top="0pt" fo:margin-bottom="0pt" fo:border="none"/>
      <style:text-properties/>
    </style:style>
    <style:style style:family="text" style:name="T1078">
      <style:text-properties fo:color="#1f1f1f" fo:font-family="Arial" style:font-family-asian="Arial" style:font-family-complex="Arial" fo:font-size="12pt"/>
    </style:style>
    <style:style style:parent-style-name="142" style:family="paragraph" style:name="P62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79">
      <style:text-properties fo:color="#1f1f1f" fo:font-family="Arial" style:font-family-asian="Arial" style:font-family-complex="Arial" fo:font-size="12pt" fo:font-weight="bold"/>
    </style:style>
    <style:style style:family="paragraph" style:name="P623">
      <style:paragraph-properties fo:line-height="115%" fo:margin-left="0cm" fo:margin-right="0cm" fo:text-indent="0cm" fo:margin-top="0pt" fo:margin-bottom="0pt" fo:border="none"/>
      <style:text-properties/>
    </style:style>
    <style:style style:family="text" style:name="T1080">
      <style:text-properties fo:color="#1f1f1f" fo:font-family="Arial" style:font-family-asian="Arial" style:font-family-complex="Arial" fo:font-size="12pt"/>
    </style:style>
    <style:style style:parent-style-name="142" style:family="paragraph" style:name="P62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81">
      <style:text-properties fo:color="#1f1f1f" fo:font-family="Arial" style:font-family-asian="Arial" style:font-family-complex="Arial" fo:font-size="12pt" fo:font-weight="bold"/>
    </style:style>
    <style:style style:family="paragraph" style:name="P625">
      <style:paragraph-properties fo:line-height="115%" fo:margin-left="0cm" fo:margin-right="0cm" fo:text-indent="0cm" fo:margin-top="0pt" fo:margin-bottom="0pt" fo:border="none"/>
      <style:text-properties/>
    </style:style>
    <style:style style:family="text" style:name="T1082">
      <style:text-properties fo:color="#1f1f1f" fo:font-family="Arial" style:font-family-asian="Arial" style:font-family-complex="Arial" fo:font-size="12pt"/>
    </style:style>
    <style:style style:parent-style-name="142" style:family="paragraph" style:name="P62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83">
      <style:text-properties fo:color="#1f1f1f" fo:font-family="Arial" style:font-family-asian="Arial" style:font-family-complex="Arial" fo:font-size="12pt" fo:font-weight="bold"/>
    </style:style>
    <style:style style:family="paragraph" style:name="P627">
      <style:paragraph-properties fo:line-height="115%" fo:margin-left="0cm" fo:margin-right="0cm" fo:text-indent="0cm" fo:margin-top="0pt" fo:margin-bottom="0pt" fo:border="none"/>
      <style:text-properties/>
    </style:style>
    <style:style style:family="text" style:name="T1084">
      <style:text-properties fo:color="#1f1f1f" fo:font-family="Arial" style:font-family-asian="Arial" style:font-family-complex="Arial" fo:font-size="12pt"/>
    </style:style>
    <style:style style:family="paragraph" style:name="P628">
      <style:paragraph-properties fo:line-height="115%" fo:margin-left="0cm" fo:margin-right="0cm" fo:text-indent="0cm" fo:margin-top="0pt" fo:margin-bottom="0pt" fo:border="none"/>
      <style:text-properties/>
    </style:style>
    <style:style style:family="text" style:name="T1085">
      <style:text-properties fo:color="#1f1f1f" fo:font-family="Arial" style:font-family-asian="Arial" style:font-family-complex="Arial" fo:font-size="12pt" fo:font-weight="bold"/>
    </style:style>
    <style:style style:parent-style-name="668" style:list-style-name="WWNum35" style:family="paragraph" style:name="P629">
      <style:paragraph-properties fo:line-height="115%" fo:margin-right="0cm" fo:margin-top="0pt" fo:margin-bottom="0pt" fo:border="none"/>
      <style:text-properties/>
    </style:style>
    <style:style style:family="text" style:name="T1086">
      <style:text-properties fo:color="#1f1f1f" fo:font-family="Arial" style:font-family-asian="Arial" style:font-family-complex="Arial" fo:font-size="12pt" fo:font-weight="bold"/>
    </style:style>
    <style:style style:family="text" style:name="T1087">
      <style:text-properties fo:color="#1f1f1f" fo:font-family="Arial" style:font-family-asian="Arial" style:font-family-complex="Arial" fo:font-size="12pt"/>
    </style:style>
    <style:style style:family="text" style:name="T1088">
      <style:text-properties fo:color="#1f1f1f" fo:font-family="Arial" style:font-family-asian="Arial" style:font-family-complex="Arial" fo:font-size="12pt" fo:font-weight="bold"/>
    </style:style>
    <style:style style:family="text" style:name="T1089">
      <style:text-properties fo:color="#1f1f1f" fo:font-family="Arial" style:font-family-asian="Arial" style:font-family-complex="Arial" fo:font-size="12pt"/>
    </style:style>
    <style:style style:parent-style-name="668" style:list-style-name="WWNum35" style:family="paragraph" style:name="P630">
      <style:paragraph-properties fo:line-height="115%" fo:margin-right="0cm" fo:margin-top="0pt" fo:margin-bottom="0pt" fo:border="none"/>
      <style:text-properties/>
    </style:style>
    <style:style style:family="text" style:name="T1090">
      <style:text-properties fo:color="#1f1f1f" fo:font-family="Arial" style:font-family-asian="Arial" style:font-family-complex="Arial" fo:font-size="12pt" fo:font-weight="bold"/>
    </style:style>
    <style:style style:family="text" style:name="T1091">
      <style:text-properties fo:color="#1f1f1f" fo:font-family="Arial" style:font-family-asian="Arial" style:font-family-complex="Arial" fo:font-size="12pt"/>
    </style:style>
    <style:style style:family="text" style:name="T1092">
      <style:text-properties fo:color="#1f1f1f" fo:font-family="Arial" style:font-family-asian="Arial" style:font-family-complex="Arial" fo:font-size="12pt" fo:font-weight="bold"/>
    </style:style>
    <style:style style:family="text" style:name="T1093">
      <style:text-properties fo:color="#1f1f1f" fo:font-family="Arial" style:font-family-asian="Arial" style:font-family-complex="Arial" fo:font-size="12pt"/>
    </style:style>
    <style:style style:family="paragraph" style:name="P631">
      <style:paragraph-properties fo:line-height="115%" fo:margin-left="0cm" fo:margin-right="0cm" fo:text-indent="0cm" fo:margin-top="0pt" fo:margin-bottom="0pt" fo:border="none"/>
      <style:text-properties/>
    </style:style>
    <style:style style:family="text" style:name="T1094">
      <style:text-properties fo:color="#1f1f1f" fo:font-family="Arial" style:font-family-asian="Arial" style:font-family-complex="Arial" fo:font-size="12pt"/>
    </style:style>
    <style:style style:parent-style-name="142" style:family="paragraph" style:name="P63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095">
      <style:text-properties fo:color="#1f1f1f" fo:font-family="Arial" style:font-family-asian="Arial" style:font-family-complex="Arial" fo:font-size="12pt" fo:font-weight="bold"/>
    </style:style>
    <style:style style:family="paragraph" style:name="P633">
      <style:paragraph-properties fo:line-height="115%" fo:margin-left="0cm" fo:margin-right="0cm" fo:text-indent="0cm" fo:margin-top="0pt" fo:margin-bottom="0pt" fo:border="none"/>
      <style:text-properties/>
    </style:style>
    <style:style style:family="text" style:name="T1096">
      <style:text-properties fo:color="#1f1f1f" fo:font-family="Arial" style:font-family-asian="Arial" style:font-family-complex="Arial" fo:font-size="12pt"/>
    </style:style>
    <style:style style:family="text" style:name="T1097">
      <style:text-properties fo:color="#1f1f1f" fo:font-family="Arial" style:font-family-asian="Arial" style:font-family-complex="Arial" fo:font-size="12pt" fo:font-weight="bold"/>
    </style:style>
    <style:style style:family="text" style:name="T1098">
      <style:text-properties fo:color="#1f1f1f" fo:font-family="Arial" style:font-family-asian="Arial" style:font-family-complex="Arial" fo:font-size="12pt"/>
    </style:style>
    <style:style style:parent-style-name="141" style:family="paragraph" style:name="P63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099">
      <style:text-properties fo:color="#1f1f1f" fo:font-family="Arial" style:font-family-asian="Arial" style:font-family-complex="Arial" fo:font-size="14pt" fo:font-weight="bold"/>
    </style:style>
    <style:style style:parent-style-name="668" style:list-style-name="WWNum35" style:family="paragraph" style:name="P635">
      <style:paragraph-properties fo:line-height="115%" fo:margin-right="0cm" fo:margin-top="0pt" fo:margin-bottom="0pt" fo:border="none"/>
      <style:text-properties/>
    </style:style>
    <style:style style:family="text" style:name="T1100">
      <style:text-properties fo:color="#1f1f1f" fo:font-family="Arial" style:font-family-asian="Arial" style:font-family-complex="Arial" fo:font-size="12pt"/>
    </style:style>
    <style:style style:parent-style-name="668" style:list-style-name="WWNum35" style:family="paragraph" style:name="P636">
      <style:paragraph-properties fo:line-height="115%" fo:margin-right="0cm" fo:margin-top="0pt" fo:margin-bottom="0pt" fo:border="none"/>
      <style:text-properties/>
    </style:style>
    <style:style style:family="text" style:name="T1101">
      <style:text-properties fo:color="#1f1f1f" fo:font-family="Arial" style:font-family-asian="Arial" style:font-family-complex="Arial" fo:font-size="12pt"/>
    </style:style>
    <style:style style:parent-style-name="668" style:list-style-name="WWNum35" style:family="paragraph" style:name="P637">
      <style:paragraph-properties fo:line-height="115%" fo:margin-right="0cm" fo:margin-top="0pt" fo:margin-bottom="0pt" fo:border="none"/>
      <style:text-properties/>
    </style:style>
    <style:style style:family="text" style:name="T1102">
      <style:text-properties fo:color="#1f1f1f" fo:font-family="Arial" style:font-family-asian="Arial" style:font-family-complex="Arial" fo:font-size="12pt"/>
    </style:style>
    <style:style style:parent-style-name="668" style:list-style-name="WWNum35" style:family="paragraph" style:name="P638">
      <style:paragraph-properties fo:line-height="115%" fo:margin-right="0cm" fo:margin-top="0pt" fo:margin-bottom="0pt" fo:border="none"/>
      <style:text-properties/>
    </style:style>
    <style:style style:family="text" style:name="T1103">
      <style:text-properties fo:color="#1f1f1f" fo:font-family="Arial" style:font-family-asian="Arial" style:font-family-complex="Arial" fo:font-size="12pt"/>
    </style:style>
    <style:style style:family="paragraph" style:name="P639">
      <style:paragraph-properties/>
      <style:text-properties/>
    </style:style>
    <style:style style:family="paragraph" style:name="P640">
      <style:paragraph-properties fo:line-height="115%" fo:margin-left="0cm" fo:margin-right="0cm" fo:text-indent="0cm" fo:margin-top="0pt" fo:margin-bottom="0pt" fo:break-before="page" fo:border="none"/>
      <style:text-properties/>
    </style:style>
    <style:style style:family="text" style:name="T1104">
      <style:text-properties fo:color="#1f1f1f" fo:font-family="Arial" style:font-family-asian="Arial" style:font-family-complex="Arial" fo:font-size="12pt"/>
    </style:style>
    <style:style style:parent-style-name="141" style:family="paragraph" style:name="P64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05">
      <style:text-properties fo:color="#1f1f1f" fo:font-family="Arial" style:font-family-asian="Arial" style:font-family-complex="Arial" fo:font-size="14pt" fo:font-weight="bold"/>
    </style:style>
    <style:style style:family="paragraph" style:name="P642">
      <style:paragraph-properties fo:line-height="115%" fo:margin-left="0cm" fo:margin-right="0cm" fo:text-indent="0cm" fo:margin-top="0pt" fo:margin-bottom="0pt" fo:border="none"/>
      <style:text-properties/>
    </style:style>
    <style:style style:family="text" style:name="T1106">
      <style:text-properties fo:color="#1f1f1f" fo:font-family="Arial" style:font-family-asian="Arial" style:font-family-complex="Arial" fo:font-size="12pt"/>
    </style:style>
    <style:style style:parent-style-name="142" style:family="paragraph" style:name="P64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07">
      <style:text-properties fo:color="#1f1f1f" fo:font-family="Arial" style:font-family-asian="Arial" style:font-family-complex="Arial" fo:font-size="12pt" fo:font-weight="bold"/>
    </style:style>
    <style:style style:family="paragraph" style:name="P644">
      <style:paragraph-properties fo:line-height="115%" fo:margin-left="0cm" fo:margin-right="0cm" fo:text-indent="0cm" fo:margin-top="0pt" fo:margin-bottom="0pt" fo:border="none"/>
      <style:text-properties/>
    </style:style>
    <style:style style:family="text" style:name="T1108">
      <style:text-properties fo:color="#1f1f1f" fo:font-family="Arial" style:font-family-asian="Arial" style:font-family-complex="Arial" fo:font-size="12pt"/>
    </style:style>
    <style:style style:family="text" style:name="T1109">
      <style:text-properties fo:color="#1f1f1f" fo:font-family="Arial" style:font-family-asian="Arial" style:font-family-complex="Arial" fo:font-size="12pt"/>
    </style:style>
    <style:style style:parent-style-name="142" style:family="paragraph" style:name="P64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10">
      <style:text-properties fo:color="#1f1f1f" fo:font-family="Arial" style:font-family-asian="Arial" style:font-family-complex="Arial" fo:font-size="12pt" fo:font-weight="bold"/>
    </style:style>
    <style:style style:family="paragraph" style:name="P646">
      <style:paragraph-properties fo:line-height="115%" fo:margin-left="0cm" fo:margin-right="0cm" fo:text-indent="0cm" fo:margin-top="0pt" fo:margin-bottom="0pt" fo:border="none"/>
      <style:text-properties/>
    </style:style>
    <style:style style:family="text" style:name="T1111">
      <style:text-properties fo:color="#1f1f1f" fo:font-family="Arial" style:font-family-asian="Arial" style:font-family-complex="Arial" fo:font-size="12pt"/>
    </style:style>
    <style:style style:family="text" style:name="T1112">
      <style:text-properties fo:color="#1f1f1f" fo:font-family="Arial" style:font-family-asian="Arial" style:font-family-complex="Arial" fo:font-size="12pt"/>
    </style:style>
    <style:style style:parent-style-name="142" style:family="paragraph" style:name="P64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13">
      <style:text-properties fo:color="#1f1f1f" fo:font-family="Arial" style:font-family-asian="Arial" style:font-family-complex="Arial" fo:font-size="12pt" fo:font-weight="bold"/>
    </style:style>
    <style:style style:family="paragraph" style:name="P648">
      <style:paragraph-properties fo:line-height="115%" fo:margin-left="0cm" fo:margin-right="0cm" fo:text-indent="0cm" fo:margin-top="0pt" fo:margin-bottom="0pt" fo:border="none"/>
      <style:text-properties/>
    </style:style>
    <style:style style:family="text" style:name="T1114">
      <style:text-properties fo:color="#1f1f1f" fo:font-family="Arial" style:font-family-asian="Arial" style:font-family-complex="Arial" fo:font-size="12pt"/>
    </style:style>
    <style:style style:family="text" style:name="T1115">
      <style:text-properties fo:color="#1f1f1f" fo:font-family="Arial" style:font-family-asian="Arial" style:font-family-complex="Arial" fo:font-size="12pt"/>
    </style:style>
    <style:style style:parent-style-name="142" style:family="paragraph" style:name="P64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16">
      <style:text-properties fo:color="#1f1f1f" fo:font-family="Arial" style:font-family-asian="Arial" style:font-family-complex="Arial" fo:font-size="12pt" fo:font-weight="bold"/>
    </style:style>
    <style:style style:family="paragraph" style:name="P650">
      <style:paragraph-properties fo:line-height="115%" fo:margin-left="0cm" fo:margin-right="0cm" fo:text-indent="0cm" fo:margin-top="0pt" fo:margin-bottom="0pt" fo:border="none"/>
      <style:text-properties/>
    </style:style>
    <style:style style:family="text" style:name="T1117">
      <style:text-properties fo:color="#1f1f1f" fo:font-family="Arial" style:font-family-asian="Arial" style:font-family-complex="Arial" fo:font-size="12pt"/>
    </style:style>
    <style:style style:parent-style-name="141" style:family="paragraph" style:name="P65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18">
      <style:text-properties fo:color="#1f1f1f" fo:font-family="Arial" style:font-family-asian="Arial" style:font-family-complex="Arial" fo:font-size="14pt" fo:font-weight="bold"/>
    </style:style>
    <style:style style:parent-style-name="668" style:list-style-name="WWNum36" style:family="paragraph" style:name="P652">
      <style:paragraph-properties fo:line-height="115%" fo:margin-right="0cm" fo:margin-top="0pt" fo:margin-bottom="0pt" fo:border="none"/>
      <style:text-properties/>
    </style:style>
    <style:style style:family="text" style:name="T1119">
      <style:text-properties fo:color="#1f1f1f" fo:font-family="Arial" style:font-family-asian="Arial" style:font-family-complex="Arial" fo:font-size="12pt"/>
    </style:style>
    <style:style style:parent-style-name="668" style:list-style-name="WWNum36" style:family="paragraph" style:name="P653">
      <style:paragraph-properties fo:line-height="115%" fo:margin-right="0cm" fo:margin-top="0pt" fo:margin-bottom="0pt" fo:border="none"/>
      <style:text-properties/>
    </style:style>
    <style:style style:family="text" style:name="T1120">
      <style:text-properties fo:color="#1f1f1f" fo:font-family="Arial" style:font-family-asian="Arial" style:font-family-complex="Arial" fo:font-size="12pt"/>
    </style:style>
    <style:style style:parent-style-name="668" style:list-style-name="WWNum36" style:family="paragraph" style:name="P654">
      <style:paragraph-properties fo:line-height="115%" fo:margin-right="0cm" fo:margin-top="0pt" fo:margin-bottom="0pt" fo:border="none"/>
      <style:text-properties/>
    </style:style>
    <style:style style:family="text" style:name="T1121">
      <style:text-properties fo:color="#1f1f1f" fo:font-family="Arial" style:font-family-asian="Arial" style:font-family-complex="Arial" fo:font-size="12pt"/>
    </style:style>
    <style:style style:parent-style-name="668" style:list-style-name="WWNum36" style:family="paragraph" style:name="P655">
      <style:paragraph-properties fo:line-height="115%" fo:margin-right="0cm" fo:margin-top="0pt" fo:margin-bottom="0pt" fo:border="none"/>
      <style:text-properties/>
    </style:style>
    <style:style style:family="text" style:name="T1122">
      <style:text-properties fo:color="#1f1f1f" fo:font-family="Arial" style:font-family-asian="Arial" style:font-family-complex="Arial" fo:font-size="12pt"/>
    </style:style>
    <style:style style:family="paragraph" style:name="P656">
      <style:paragraph-properties/>
      <style:text-properties/>
    </style:style>
    <style:style style:family="paragraph" style:name="P657">
      <style:paragraph-properties fo:line-height="115%" fo:margin-left="0cm" fo:margin-right="0cm" fo:text-indent="0cm" fo:margin-top="0pt" fo:margin-bottom="0pt" fo:break-before="page" fo:border="none"/>
      <style:text-properties/>
    </style:style>
    <style:style style:family="text" style:name="T1123">
      <style:text-properties fo:color="#1f1f1f" fo:font-family="Arial" style:font-family-asian="Arial" style:font-family-complex="Arial" fo:font-size="12pt"/>
    </style:style>
    <style:style style:parent-style-name="141" style:family="paragraph" style:name="P65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24">
      <style:text-properties fo:color="#1f1f1f" fo:font-family="Arial" style:font-family-asian="Arial" style:font-family-complex="Arial" fo:font-size="14pt" fo:font-weight="bold"/>
    </style:style>
    <style:style style:family="paragraph" style:name="P659">
      <style:paragraph-properties fo:line-height="115%" fo:margin-left="0cm" fo:margin-right="0cm" fo:text-indent="0cm" fo:margin-top="0pt" fo:margin-bottom="0pt" fo:border="none"/>
      <style:text-properties/>
    </style:style>
    <style:style style:family="text" style:name="T1125">
      <style:text-properties fo:color="#1f1f1f" fo:font-family="Arial" style:font-family-asian="Arial" style:font-family-complex="Arial" fo:font-size="12pt"/>
    </style:style>
    <style:style style:parent-style-name="142" style:family="paragraph" style:name="P66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26">
      <style:text-properties fo:color="#1f1f1f" fo:font-family="Arial" style:font-family-asian="Arial" style:font-family-complex="Arial" fo:font-size="12pt" fo:font-weight="bold"/>
    </style:style>
    <style:style style:family="paragraph" style:name="P661">
      <style:paragraph-properties fo:line-height="115%" fo:margin-left="0cm" fo:margin-right="0cm" fo:text-indent="0cm" fo:margin-top="0pt" fo:margin-bottom="0pt" fo:border="none"/>
      <style:text-properties/>
    </style:style>
    <style:style style:family="text" style:name="T1127">
      <style:text-properties fo:color="#1f1f1f" fo:font-family="Arial" style:font-family-asian="Arial" style:font-family-complex="Arial" fo:font-size="12pt"/>
    </style:style>
    <style:style style:parent-style-name="142" style:family="paragraph" style:name="P66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28">
      <style:text-properties fo:color="#1f1f1f" fo:font-family="Arial" style:font-family-asian="Arial" style:font-family-complex="Arial" fo:font-size="12pt" fo:font-weight="bold"/>
    </style:style>
    <style:style style:family="paragraph" style:name="P663">
      <style:paragraph-properties fo:line-height="115%" fo:margin-left="0cm" fo:margin-right="0cm" fo:text-indent="0cm" fo:margin-top="0pt" fo:margin-bottom="0pt" fo:border="none"/>
      <style:text-properties/>
    </style:style>
    <style:style style:family="text" style:name="T1129">
      <style:text-properties fo:color="#1f1f1f" fo:font-family="Arial" style:font-family-asian="Arial" style:font-family-complex="Arial" fo:font-size="12pt"/>
    </style:style>
    <style:style style:family="text" style:name="T1130">
      <style:text-properties fo:color="#1f1f1f" fo:font-family="Arial" style:font-family-asian="Arial" style:font-family-complex="Arial" fo:font-size="12pt"/>
    </style:style>
    <style:style style:parent-style-name="142" style:family="paragraph" style:name="P66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31">
      <style:text-properties fo:color="#1f1f1f" fo:font-family="Arial" style:font-family-asian="Arial" style:font-family-complex="Arial" fo:font-size="12pt" fo:font-weight="bold"/>
    </style:style>
    <style:style style:family="paragraph" style:name="P665">
      <style:paragraph-properties fo:line-height="115%" fo:margin-left="0cm" fo:margin-right="0cm" fo:text-indent="0cm" fo:margin-top="0pt" fo:margin-bottom="0pt" fo:border="none"/>
      <style:text-properties/>
    </style:style>
    <style:style style:family="text" style:name="T1132">
      <style:text-properties fo:color="#1f1f1f" fo:font-family="Arial" style:font-family-asian="Arial" style:font-family-complex="Arial" fo:font-size="12pt"/>
    </style:style>
    <style:style style:parent-style-name="142" style:family="paragraph" style:name="P66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33">
      <style:text-properties fo:color="#1f1f1f" fo:font-family="Arial" style:font-family-asian="Arial" style:font-family-complex="Arial" fo:font-size="12pt" fo:font-weight="bold"/>
    </style:style>
    <style:style style:family="paragraph" style:name="P667">
      <style:paragraph-properties fo:line-height="115%" fo:margin-left="0cm" fo:margin-right="0cm" fo:text-indent="0cm" fo:margin-top="0pt" fo:margin-bottom="0pt" fo:border="none"/>
      <style:text-properties/>
    </style:style>
    <style:style style:family="text" style:name="T1134">
      <style:text-properties fo:color="#1f1f1f" fo:font-family="Arial" style:font-family-asian="Arial" style:font-family-complex="Arial" fo:font-size="12pt"/>
    </style:style>
    <style:style style:parent-style-name="141" style:family="paragraph" style:name="P66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35">
      <style:text-properties fo:color="#1f1f1f" fo:font-family="Arial" style:font-family-asian="Arial" style:font-family-complex="Arial" fo:font-size="14pt" fo:font-weight="bold"/>
    </style:style>
    <style:style style:parent-style-name="668" style:list-style-name="WWNum37" style:family="paragraph" style:name="P669">
      <style:paragraph-properties fo:line-height="115%" fo:margin-right="0cm" fo:margin-top="0pt" fo:margin-bottom="0pt" fo:border="none"/>
      <style:text-properties/>
    </style:style>
    <style:style style:family="text" style:name="T1136">
      <style:text-properties fo:color="#1f1f1f" fo:font-family="Arial" style:font-family-asian="Arial" style:font-family-complex="Arial" fo:font-size="12pt"/>
    </style:style>
    <style:style style:parent-style-name="668" style:list-style-name="WWNum37" style:family="paragraph" style:name="P670">
      <style:paragraph-properties fo:line-height="115%" fo:margin-right="0cm" fo:margin-top="0pt" fo:margin-bottom="0pt" fo:border="none"/>
      <style:text-properties/>
    </style:style>
    <style:style style:family="text" style:name="T1137">
      <style:text-properties fo:color="#1f1f1f" fo:font-family="Arial" style:font-family-asian="Arial" style:font-family-complex="Arial" fo:font-size="12pt"/>
    </style:style>
    <style:style style:parent-style-name="668" style:list-style-name="WWNum37" style:family="paragraph" style:name="P671">
      <style:paragraph-properties fo:line-height="115%" fo:margin-right="0cm" fo:margin-top="0pt" fo:margin-bottom="0pt" fo:border="none"/>
      <style:text-properties/>
    </style:style>
    <style:style style:family="text" style:name="T1138">
      <style:text-properties fo:color="#1f1f1f" fo:font-family="Arial" style:font-family-asian="Arial" style:font-family-complex="Arial" fo:font-size="12pt"/>
    </style:style>
    <style:style style:parent-style-name="668" style:list-style-name="WWNum37" style:family="paragraph" style:name="P672">
      <style:paragraph-properties fo:line-height="115%" fo:margin-right="0cm" fo:margin-top="0pt" fo:margin-bottom="0pt" fo:border="none"/>
      <style:text-properties/>
    </style:style>
    <style:style style:family="text" style:name="T1139">
      <style:text-properties fo:color="#1f1f1f" fo:font-family="Arial" style:font-family-asian="Arial" style:font-family-complex="Arial" fo:font-size="12pt"/>
    </style:style>
    <style:style style:family="paragraph" style:name="P673">
      <style:paragraph-properties/>
      <style:text-properties/>
    </style:style>
    <style:style style:parent-style-name="141" style:family="paragraph" style:name="P674">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140">
      <style:text-properties fo:color="#1f1f1f" fo:font-family="Arial" style:font-family-asian="Arial" style:font-family-complex="Arial" fo:font-size="14pt" fo:font-weight="bold"/>
    </style:style>
    <style:style style:family="paragraph" style:name="P675">
      <style:paragraph-properties fo:line-height="115%" fo:margin-left="0cm" fo:margin-right="0cm" fo:text-indent="0cm" fo:margin-top="0pt" fo:margin-bottom="0pt" fo:border="none"/>
      <style:text-properties/>
    </style:style>
    <style:style style:family="text" style:name="T1141">
      <style:text-properties fo:color="#1f1f1f" fo:font-family="Arial" style:font-family-asian="Arial" style:font-family-complex="Arial" fo:font-size="12pt"/>
    </style:style>
    <style:style style:parent-style-name="142" style:family="paragraph" style:name="P67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42">
      <style:text-properties fo:color="#1f1f1f" fo:font-family="Arial" style:font-family-asian="Arial" style:font-family-complex="Arial" fo:font-size="12pt" fo:font-weight="bold"/>
    </style:style>
    <style:style style:family="paragraph" style:name="P677">
      <style:paragraph-properties fo:line-height="115%" fo:margin-left="0cm" fo:margin-right="0cm" fo:text-indent="0cm" fo:margin-top="0pt" fo:margin-bottom="0pt" fo:border="none"/>
      <style:text-properties/>
    </style:style>
    <style:style style:family="text" style:name="T1143">
      <style:text-properties fo:color="#1f1f1f" fo:font-family="Arial" style:font-family-asian="Arial" style:font-family-complex="Arial" fo:font-size="12pt"/>
    </style:style>
    <style:style style:family="text" style:name="T1144">
      <style:text-properties fo:color="#1f1f1f" fo:font-family="Arial" style:font-family-asian="Arial" style:font-family-complex="Arial" fo:font-size="12pt"/>
    </style:style>
    <style:style style:parent-style-name="142" style:family="paragraph" style:name="P67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45">
      <style:text-properties fo:color="#1f1f1f" fo:font-family="Arial" style:font-family-asian="Arial" style:font-family-complex="Arial" fo:font-size="12pt" fo:font-weight="bold"/>
    </style:style>
    <style:style style:family="paragraph" style:name="P679">
      <style:paragraph-properties fo:line-height="115%" fo:margin-left="0cm" fo:margin-right="0cm" fo:text-indent="0cm" fo:margin-top="0pt" fo:margin-bottom="0pt" fo:border="none"/>
      <style:text-properties/>
    </style:style>
    <style:style style:family="text" style:name="T1146">
      <style:text-properties fo:color="#1f1f1f" fo:font-family="Arial" style:font-family-asian="Arial" style:font-family-complex="Arial" fo:font-size="12pt"/>
    </style:style>
    <style:style style:parent-style-name="142" style:family="paragraph" style:name="P68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47">
      <style:text-properties fo:color="#1f1f1f" fo:font-family="Arial" style:font-family-asian="Arial" style:font-family-complex="Arial" fo:font-size="12pt" fo:font-weight="bold"/>
    </style:style>
    <style:style style:family="paragraph" style:name="P681">
      <style:paragraph-properties fo:line-height="115%" fo:margin-left="0cm" fo:margin-right="0cm" fo:text-indent="0cm" fo:margin-top="0pt" fo:margin-bottom="0pt" fo:border="none"/>
      <style:text-properties/>
    </style:style>
    <style:style style:family="text" style:name="T1148">
      <style:text-properties fo:color="#1f1f1f" fo:font-family="Arial" style:font-family-asian="Arial" style:font-family-complex="Arial" fo:font-size="12pt"/>
    </style:style>
    <style:style style:parent-style-name="141" style:family="paragraph" style:name="P682">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49">
      <style:text-properties fo:color="#1f1f1f" fo:font-family="Arial" style:font-family-asian="Arial" style:font-family-complex="Arial" fo:font-size="14pt" fo:font-weight="bold"/>
    </style:style>
    <style:style style:parent-style-name="668" style:list-style-name="WWNum38" style:family="paragraph" style:name="P683">
      <style:paragraph-properties fo:line-height="115%" fo:margin-right="0cm" fo:margin-top="0pt" fo:margin-bottom="0pt" fo:border="none"/>
      <style:text-properties/>
    </style:style>
    <style:style style:family="text" style:name="T1150">
      <style:text-properties fo:color="#1f1f1f" fo:font-family="Arial" style:font-family-asian="Arial" style:font-family-complex="Arial" fo:font-size="12pt"/>
    </style:style>
    <style:style style:parent-style-name="668" style:list-style-name="WWNum38" style:family="paragraph" style:name="P684">
      <style:paragraph-properties fo:line-height="115%" fo:margin-right="0cm" fo:margin-top="0pt" fo:margin-bottom="0pt" fo:border="none"/>
      <style:text-properties/>
    </style:style>
    <style:style style:family="text" style:name="T1151">
      <style:text-properties fo:color="#1f1f1f" fo:font-family="Arial" style:font-family-asian="Arial" style:font-family-complex="Arial" fo:font-size="12pt"/>
    </style:style>
    <style:style style:parent-style-name="668" style:list-style-name="WWNum38" style:family="paragraph" style:name="P685">
      <style:paragraph-properties fo:line-height="115%" fo:margin-right="0cm" fo:margin-top="0pt" fo:margin-bottom="0pt" fo:border="none"/>
      <style:text-properties/>
    </style:style>
    <style:style style:family="text" style:name="T1152">
      <style:text-properties fo:color="#1f1f1f" fo:font-family="Arial" style:font-family-asian="Arial" style:font-family-complex="Arial" fo:font-size="12pt"/>
    </style:style>
    <style:style style:family="paragraph" style:name="P686">
      <style:paragraph-properties/>
      <style:text-properties/>
    </style:style>
    <style:style style:parent-style-name="141" style:family="paragraph" style:name="P68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153">
      <style:text-properties fo:color="#1f1f1f" fo:font-family="Arial" style:font-family-asian="Arial" style:font-family-complex="Arial" fo:font-size="14pt" fo:font-weight="bold"/>
    </style:style>
    <style:style style:family="paragraph" style:name="P688">
      <style:paragraph-properties fo:line-height="115%" fo:margin-left="0cm" fo:margin-right="0cm" fo:text-indent="0cm" fo:margin-top="0pt" fo:margin-bottom="0pt" fo:border="none"/>
      <style:text-properties/>
    </style:style>
    <style:style style:family="text" style:name="T1154">
      <style:text-properties fo:color="#1f1f1f" fo:font-family="Arial" style:font-family-asian="Arial" style:font-family-complex="Arial" fo:font-size="12pt"/>
    </style:style>
    <style:style style:parent-style-name="142" style:family="paragraph" style:name="P68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55">
      <style:text-properties fo:color="#1f1f1f" fo:font-family="Arial" style:font-family-asian="Arial" style:font-family-complex="Arial" fo:font-size="12pt" fo:font-weight="bold"/>
    </style:style>
    <style:style style:family="paragraph" style:name="P690">
      <style:paragraph-properties fo:line-height="115%" fo:margin-left="0cm" fo:margin-right="0cm" fo:text-indent="0cm" fo:margin-top="0pt" fo:margin-bottom="0pt" fo:border="none"/>
      <style:text-properties/>
    </style:style>
    <style:style style:family="text" style:name="T1156">
      <style:text-properties fo:color="#1f1f1f" fo:font-family="Arial" style:font-family-asian="Arial" style:font-family-complex="Arial" fo:font-size="12pt"/>
    </style:style>
    <style:style style:parent-style-name="142" style:family="paragraph" style:name="P69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57">
      <style:text-properties fo:color="#1f1f1f" fo:font-family="Arial" style:font-family-asian="Arial" style:font-family-complex="Arial" fo:font-size="12pt" fo:font-weight="bold"/>
    </style:style>
    <style:style style:family="paragraph" style:name="P692">
      <style:paragraph-properties fo:line-height="115%" fo:margin-left="0cm" fo:margin-right="0cm" fo:text-indent="0cm" fo:margin-top="0pt" fo:margin-bottom="0pt" fo:border="none"/>
      <style:text-properties/>
    </style:style>
    <style:style style:family="text" style:name="T1158">
      <style:text-properties fo:color="#1f1f1f" fo:font-family="Arial" style:font-family-asian="Arial" style:font-family-complex="Arial" fo:font-size="12pt"/>
    </style:style>
    <style:style style:parent-style-name="668" style:list-style-name="WWNum39" style:family="paragraph" style:name="P693">
      <style:paragraph-properties fo:line-height="115%" fo:margin-right="0cm" fo:margin-top="0pt" fo:margin-bottom="0pt" fo:border="none"/>
      <style:text-properties/>
    </style:style>
    <style:style style:family="text" style:name="T1159">
      <style:text-properties fo:color="#1f1f1f" fo:font-family="Arial" style:font-family-asian="Arial" style:font-family-complex="Arial" fo:font-size="12pt"/>
    </style:style>
    <style:style style:parent-style-name="668" style:list-style-name="WWNum39" style:family="paragraph" style:name="P694">
      <style:paragraph-properties fo:line-height="115%" fo:margin-right="0cm" fo:margin-top="0pt" fo:margin-bottom="0pt" fo:border="none"/>
      <style:text-properties/>
    </style:style>
    <style:style style:family="text" style:name="T1160">
      <style:text-properties fo:color="#1f1f1f" fo:font-family="Arial" style:font-family-asian="Arial" style:font-family-complex="Arial" fo:font-size="12pt"/>
    </style:style>
    <style:style style:parent-style-name="668" style:list-style-name="WWNum39" style:family="paragraph" style:name="P695">
      <style:paragraph-properties fo:line-height="115%" fo:margin-right="0cm" fo:margin-top="0pt" fo:margin-bottom="0pt" fo:border="none"/>
      <style:text-properties/>
    </style:style>
    <style:style style:family="text" style:name="T1161">
      <style:text-properties fo:color="#1f1f1f" fo:font-family="Arial" style:font-family-asian="Arial" style:font-family-complex="Arial" fo:font-size="12pt"/>
    </style:style>
    <style:style style:parent-style-name="142" style:family="paragraph" style:name="P69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62">
      <style:text-properties fo:color="#1f1f1f" fo:font-family="Arial" style:font-family-asian="Arial" style:font-family-complex="Arial" fo:font-size="12pt" fo:font-weight="bold"/>
    </style:style>
    <style:style style:family="table" style:name="ta4">
      <style:paragraph-properties fo:line-height="100%" fo:margin-bottom="0pt"/>
      <style:table-properties style:width="13.72cm" fo:margin-left="0cm" table:align="left" style:use-optimal-column-width="true"/>
    </style:style>
    <style:style style:family="table-column" style:name="co10">
      <style:table-column-properties style:column-width="2.415cm" style:use-optimal-column-width="true"/>
    </style:style>
    <style:style style:family="table-column" style:name="co11">
      <style:table-column-properties style:column-width="5.225cm" style:use-optimal-column-width="true"/>
    </style:style>
    <style:style style:family="table-column" style:name="co12">
      <style:table-column-properties style:column-width="6.075cm" style:use-optimal-column-width="true"/>
    </style:style>
    <style:style style:family="table-row" style:name="ro10">
      <style:table-row-properties/>
    </style:style>
    <style:style style:family="table-cell" style:name="ce3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7">
      <style:paragraph-properties style:line-height-at-least="12pt" fo:margin-top="0pt" fo:margin-bottom="0pt"/>
      <style:text-properties/>
    </style:style>
    <style:style style:family="text" style:name="T1163">
      <style:text-properties fo:color="#1f1f1f" fo:font-family="Arial" style:font-family-asian="Arial" style:font-family-complex="Arial" fo:font-size="12pt" fo:font-weight="bold"/>
    </style:style>
    <style:style style:family="table-cell" style:name="ce3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8">
      <style:paragraph-properties style:line-height-at-least="12pt" fo:margin-top="0pt" fo:margin-bottom="0pt"/>
      <style:text-properties/>
    </style:style>
    <style:style style:family="text" style:name="T1164">
      <style:text-properties fo:color="#1f1f1f" fo:font-family="Arial" style:font-family-asian="Arial" style:font-family-complex="Arial" fo:font-size="12pt" fo:font-weight="bold"/>
    </style:style>
    <style:style style:family="table-cell" style:name="ce3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699">
      <style:paragraph-properties style:line-height-at-least="12pt" fo:margin-top="0pt" fo:margin-bottom="0pt"/>
      <style:text-properties/>
    </style:style>
    <style:style style:family="text" style:name="T1165">
      <style:text-properties fo:color="#1f1f1f" fo:font-family="Arial" style:font-family-asian="Arial" style:font-family-complex="Arial" fo:font-size="12pt" fo:font-weight="bold"/>
    </style:style>
    <style:style style:family="table-row" style:name="ro11">
      <style:table-row-properties/>
    </style:style>
    <style:style style:family="table-cell" style:name="ce3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0">
      <style:paragraph-properties style:line-height-at-least="12pt" fo:margin-top="0pt" fo:margin-bottom="0pt"/>
      <style:text-properties/>
    </style:style>
    <style:style style:family="text" style:name="T1166">
      <style:text-properties fo:color="#1f1f1f" fo:font-family="Arial" style:font-family-asian="Arial" style:font-family-complex="Arial" fo:font-size="12pt"/>
    </style:style>
    <style:style style:family="table-cell" style:name="ce3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1">
      <style:paragraph-properties style:line-height-at-least="12pt" fo:margin-top="0pt" fo:margin-bottom="0pt"/>
      <style:text-properties/>
    </style:style>
    <style:style style:family="text" style:name="T1167">
      <style:text-properties fo:color="#1f1f1f" fo:font-family="Arial" style:font-family-asian="Arial" style:font-family-complex="Arial" fo:font-size="12pt"/>
    </style:style>
    <style:style style:family="table-cell" style:name="ce3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2">
      <style:paragraph-properties style:line-height-at-least="12pt" fo:margin-top="0pt" fo:margin-bottom="0pt"/>
      <style:text-properties/>
    </style:style>
    <style:style style:family="text" style:name="T1168">
      <style:text-properties fo:color="#1f1f1f" fo:font-family="Arial" style:font-family-asian="Arial" style:font-family-complex="Arial" fo:font-size="12pt"/>
    </style:style>
    <style:style style:family="table-row" style:name="ro12">
      <style:table-row-properties/>
    </style:style>
    <style:style style:family="table-cell" style:name="ce3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3">
      <style:paragraph-properties style:line-height-at-least="12pt" fo:margin-top="0pt" fo:margin-bottom="0pt"/>
      <style:text-properties/>
    </style:style>
    <style:style style:family="text" style:name="T1169">
      <style:text-properties fo:color="#1f1f1f" fo:font-family="Arial" style:font-family-asian="Arial" style:font-family-complex="Arial" fo:font-size="12pt"/>
    </style:style>
    <style:style style:family="table-cell" style:name="ce3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4">
      <style:paragraph-properties style:line-height-at-least="12pt" fo:margin-top="0pt" fo:margin-bottom="0pt"/>
      <style:text-properties/>
    </style:style>
    <style:style style:family="text" style:name="T1170">
      <style:text-properties fo:color="#1f1f1f" fo:font-family="Arial" style:font-family-asian="Arial" style:font-family-complex="Arial" fo:font-size="12pt"/>
    </style:style>
    <style:style style:family="table-cell" style:name="ce4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5">
      <style:paragraph-properties style:line-height-at-least="12pt" fo:margin-top="0pt" fo:margin-bottom="0pt"/>
      <style:text-properties/>
    </style:style>
    <style:style style:family="text" style:name="T1171">
      <style:text-properties fo:color="#1f1f1f" fo:font-family="Arial" style:font-family-asian="Arial" style:font-family-complex="Arial" fo:font-size="12pt"/>
    </style:style>
    <style:style style:family="table-row" style:name="ro13">
      <style:table-row-properties/>
    </style:style>
    <style:style style:family="table-cell" style:name="ce4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6">
      <style:paragraph-properties style:line-height-at-least="12pt" fo:margin-top="0pt" fo:margin-bottom="0pt"/>
      <style:text-properties/>
    </style:style>
    <style:style style:family="text" style:name="T1172">
      <style:text-properties fo:color="#1f1f1f" fo:font-family="Arial" style:font-family-asian="Arial" style:font-family-complex="Arial" fo:font-size="12pt"/>
    </style:style>
    <style:style style:family="table-cell" style:name="ce4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7">
      <style:paragraph-properties style:line-height-at-least="12pt" fo:margin-top="0pt" fo:margin-bottom="0pt"/>
      <style:text-properties/>
    </style:style>
    <style:style style:family="text" style:name="T1173">
      <style:text-properties fo:color="#1f1f1f" fo:font-family="Arial" style:font-family-asian="Arial" style:font-family-complex="Arial" fo:font-size="12pt"/>
    </style:style>
    <style:style style:family="table-cell" style:name="ce4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708">
      <style:paragraph-properties style:line-height-at-least="12pt" fo:margin-top="0pt" fo:margin-bottom="0pt"/>
      <style:text-properties/>
    </style:style>
    <style:style style:family="text" style:name="T1174">
      <style:text-properties fo:color="#1f1f1f" fo:font-family="Arial" style:font-family-asian="Arial" style:font-family-complex="Arial" fo:font-size="12pt"/>
    </style:style>
    <style:style style:parent-style-name="142" style:family="paragraph" style:name="P70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75">
      <style:text-properties fo:color="#1f1f1f" fo:font-family="Arial" style:font-family-asian="Arial" style:font-family-complex="Arial" fo:font-size="12pt" fo:font-weight="bold"/>
    </style:style>
    <style:style style:family="paragraph" style:name="P710">
      <style:paragraph-properties fo:line-height="115%" fo:margin-left="0cm" fo:margin-right="0cm" fo:text-indent="0cm" fo:margin-top="0pt" fo:margin-bottom="0pt" fo:border="none"/>
      <style:text-properties/>
    </style:style>
    <style:style style:family="text" style:name="T1176">
      <style:text-properties fo:color="#1f1f1f" fo:font-family="Arial" style:font-family-asian="Arial" style:font-family-complex="Arial" fo:font-size="12pt"/>
    </style:style>
    <style:style style:parent-style-name="141" style:family="paragraph" style:name="P71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77">
      <style:text-properties fo:color="#1f1f1f" fo:font-family="Arial" style:font-family-asian="Arial" style:font-family-complex="Arial" fo:font-size="14pt" fo:font-weight="bold"/>
    </style:style>
    <style:style style:parent-style-name="668" style:list-style-name="WWNum39" style:family="paragraph" style:name="P712">
      <style:paragraph-properties fo:line-height="115%" fo:margin-right="0cm" fo:margin-top="0pt" fo:margin-bottom="0pt" fo:border="none"/>
      <style:text-properties/>
    </style:style>
    <style:style style:family="text" style:name="T1178">
      <style:text-properties fo:color="#1f1f1f" fo:font-family="Arial" style:font-family-asian="Arial" style:font-family-complex="Arial" fo:font-size="12pt"/>
    </style:style>
    <style:style style:parent-style-name="668" style:list-style-name="WWNum39" style:family="paragraph" style:name="P713">
      <style:paragraph-properties fo:line-height="115%" fo:margin-right="0cm" fo:margin-top="0pt" fo:margin-bottom="0pt" fo:border="none"/>
      <style:text-properties/>
    </style:style>
    <style:style style:family="text" style:name="T1179">
      <style:text-properties fo:color="#1f1f1f" fo:font-family="Arial" style:font-family-asian="Arial" style:font-family-complex="Arial" fo:font-size="12pt"/>
    </style:style>
    <style:style style:parent-style-name="668" style:list-style-name="WWNum39" style:family="paragraph" style:name="P714">
      <style:paragraph-properties fo:line-height="115%" fo:margin-right="0cm" fo:margin-top="0pt" fo:margin-bottom="0pt" fo:border="none"/>
      <style:text-properties/>
    </style:style>
    <style:style style:family="text" style:name="T1180">
      <style:text-properties fo:color="#1f1f1f" fo:font-family="Arial" style:font-family-asian="Arial" style:font-family-complex="Arial" fo:font-size="12pt"/>
    </style:style>
    <style:style style:parent-style-name="668" style:list-style-name="WWNum39" style:family="paragraph" style:name="P715">
      <style:paragraph-properties fo:line-height="115%" fo:margin-right="0cm" fo:margin-top="0pt" fo:margin-bottom="0pt" fo:border="none"/>
      <style:text-properties/>
    </style:style>
    <style:style style:family="text" style:name="T1181">
      <style:text-properties fo:color="#1f1f1f" fo:font-family="Arial" style:font-family-asian="Arial" style:font-family-complex="Arial" fo:font-size="12pt"/>
    </style:style>
    <style:style style:family="paragraph" style:name="P716">
      <style:paragraph-properties/>
      <style:text-properties/>
    </style:style>
    <style:style style:family="paragraph" style:name="P717">
      <style:paragraph-properties fo:line-height="115%" fo:margin-left="0cm" fo:margin-right="0cm" fo:text-indent="0cm" fo:margin-top="0pt" fo:margin-bottom="0pt" fo:break-before="page" fo:border="none"/>
      <style:text-properties/>
    </style:style>
    <style:style style:family="text" style:name="T1182">
      <style:text-properties fo:color="#1f1f1f" fo:font-family="Arial" style:font-family-asian="Arial" style:font-family-complex="Arial" fo:font-size="12pt"/>
    </style:style>
    <style:style style:parent-style-name="141" style:family="paragraph" style:name="P71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83">
      <style:text-properties fo:color="#1f1f1f" fo:font-family="Arial" style:font-family-asian="Arial" style:font-family-complex="Arial" fo:font-size="14pt" fo:font-weight="bold"/>
    </style:style>
    <style:style style:family="paragraph" style:name="P719">
      <style:paragraph-properties fo:line-height="115%" fo:margin-left="0cm" fo:margin-right="0cm" fo:text-indent="0cm" fo:margin-top="0pt" fo:margin-bottom="0pt" fo:border="none"/>
      <style:text-properties/>
    </style:style>
    <style:style style:family="text" style:name="T1184">
      <style:text-properties fo:color="#1f1f1f" fo:font-family="Arial" style:font-family-asian="Arial" style:font-family-complex="Arial" fo:font-size="12pt"/>
    </style:style>
    <style:style style:parent-style-name="142" style:family="paragraph" style:name="P72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85">
      <style:text-properties fo:color="#1f1f1f" fo:font-family="Arial" style:font-family-asian="Arial" style:font-family-complex="Arial" fo:font-size="12pt" fo:font-weight="bold"/>
    </style:style>
    <style:style style:family="paragraph" style:name="P721">
      <style:paragraph-properties fo:line-height="115%" fo:margin-left="0cm" fo:margin-right="0cm" fo:text-indent="0cm" fo:margin-top="0pt" fo:margin-bottom="0pt" fo:border="none"/>
      <style:text-properties/>
    </style:style>
    <style:style style:family="text" style:name="T1186">
      <style:text-properties fo:color="#1f1f1f" fo:font-family="Arial" style:font-family-asian="Arial" style:font-family-complex="Arial" fo:font-size="12pt"/>
    </style:style>
    <style:style style:family="text" style:name="T1187">
      <style:text-properties fo:color="#1f1f1f" fo:font-family="Arial" style:font-family-asian="Arial" style:font-family-complex="Arial" fo:font-size="12pt"/>
    </style:style>
    <style:style style:parent-style-name="142" style:family="paragraph" style:name="P72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88">
      <style:text-properties fo:color="#1f1f1f" fo:font-family="Arial" style:font-family-asian="Arial" style:font-family-complex="Arial" fo:font-size="12pt" fo:font-weight="bold"/>
    </style:style>
    <style:style style:family="paragraph" style:name="P723">
      <style:paragraph-properties fo:line-height="115%" fo:margin-left="0cm" fo:margin-right="0cm" fo:text-indent="0cm" fo:margin-top="0pt" fo:margin-bottom="0pt" fo:border="none"/>
      <style:text-properties/>
    </style:style>
    <style:style style:family="text" style:name="T1189">
      <style:text-properties fo:color="#1f1f1f" fo:font-family="Arial" style:font-family-asian="Arial" style:font-family-complex="Arial" fo:font-size="12pt"/>
    </style:style>
    <style:style style:parent-style-name="142" style:family="paragraph" style:name="P72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90">
      <style:text-properties fo:color="#1f1f1f" fo:font-family="Arial" style:font-family-asian="Arial" style:font-family-complex="Arial" fo:font-size="12pt" fo:font-weight="bold"/>
    </style:style>
    <style:style style:family="paragraph" style:name="P725">
      <style:paragraph-properties fo:line-height="115%" fo:margin-left="0cm" fo:margin-right="0cm" fo:text-indent="0cm" fo:margin-top="0pt" fo:margin-bottom="0pt" fo:border="none"/>
      <style:text-properties/>
    </style:style>
    <style:style style:family="text" style:name="T1191">
      <style:text-properties fo:color="#1f1f1f" fo:font-family="Arial" style:font-family-asian="Arial" style:font-family-complex="Arial" fo:font-size="12pt"/>
    </style:style>
    <style:style style:parent-style-name="142" style:family="paragraph" style:name="P72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192">
      <style:text-properties fo:color="#1f1f1f" fo:font-family="Arial" style:font-family-asian="Arial" style:font-family-complex="Arial" fo:font-size="12pt" fo:font-weight="bold"/>
    </style:style>
    <style:style style:family="paragraph" style:name="P727">
      <style:paragraph-properties fo:line-height="115%" fo:margin-left="0cm" fo:margin-right="0cm" fo:text-indent="0cm" fo:margin-top="0pt" fo:margin-bottom="0pt" fo:border="none"/>
      <style:text-properties/>
    </style:style>
    <style:style style:family="text" style:name="T1193">
      <style:text-properties fo:color="#1f1f1f" fo:font-family="Arial" style:font-family-asian="Arial" style:font-family-complex="Arial" fo:font-size="12pt"/>
    </style:style>
    <style:style style:parent-style-name="141" style:family="paragraph" style:name="P72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194">
      <style:text-properties fo:color="#1f1f1f" fo:font-family="Arial" style:font-family-asian="Arial" style:font-family-complex="Arial" fo:font-size="14pt" fo:font-weight="bold"/>
    </style:style>
    <style:style style:parent-style-name="668" style:list-style-name="WWNum40" style:family="paragraph" style:name="P729">
      <style:paragraph-properties fo:line-height="115%" fo:margin-right="0cm" fo:margin-top="0pt" fo:margin-bottom="0pt" fo:border="none"/>
      <style:text-properties/>
    </style:style>
    <style:style style:family="text" style:name="T1195">
      <style:text-properties fo:color="#1f1f1f" fo:font-family="Arial" style:font-family-asian="Arial" style:font-family-complex="Arial" fo:font-size="12pt"/>
    </style:style>
    <style:style style:parent-style-name="668" style:list-style-name="WWNum40" style:family="paragraph" style:name="P730">
      <style:paragraph-properties fo:line-height="115%" fo:margin-right="0cm" fo:margin-top="0pt" fo:margin-bottom="0pt" fo:border="none"/>
      <style:text-properties/>
    </style:style>
    <style:style style:family="text" style:name="T1196">
      <style:text-properties fo:color="#1f1f1f" fo:font-family="Arial" style:font-family-asian="Arial" style:font-family-complex="Arial" fo:font-size="12pt"/>
    </style:style>
    <style:style style:parent-style-name="668" style:list-style-name="WWNum40" style:family="paragraph" style:name="P731">
      <style:paragraph-properties fo:line-height="115%" fo:margin-right="0cm" fo:margin-top="0pt" fo:margin-bottom="0pt" fo:border="none"/>
      <style:text-properties/>
    </style:style>
    <style:style style:family="text" style:name="T1197">
      <style:text-properties fo:color="#1f1f1f" fo:font-family="Arial" style:font-family-asian="Arial" style:font-family-complex="Arial" fo:font-size="12pt"/>
    </style:style>
    <style:style style:parent-style-name="668" style:list-style-name="WWNum40" style:family="paragraph" style:name="P732">
      <style:paragraph-properties fo:line-height="115%" fo:margin-right="0cm" fo:margin-top="0pt" fo:margin-bottom="0pt" fo:border="none"/>
      <style:text-properties/>
    </style:style>
    <style:style style:family="text" style:name="T1198">
      <style:text-properties fo:color="#1f1f1f" fo:font-family="Arial" style:font-family-asian="Arial" style:font-family-complex="Arial" fo:font-size="12pt"/>
    </style:style>
    <style:style style:family="paragraph" style:name="P733">
      <style:paragraph-properties/>
      <style:text-properties/>
    </style:style>
    <style:style style:family="paragraph" style:name="P734">
      <style:paragraph-properties fo:line-height="115%" fo:margin-left="0cm" fo:margin-right="0cm" fo:text-indent="0cm" fo:margin-top="0pt" fo:margin-bottom="0pt" fo:break-before="page" fo:border="none"/>
      <style:text-properties/>
    </style:style>
    <style:style style:family="text" style:name="T1199">
      <style:text-properties fo:color="#1f1f1f" fo:font-family="Arial" style:font-family-asian="Arial" style:font-family-complex="Arial" fo:font-size="12pt"/>
    </style:style>
    <style:style style:parent-style-name="141" style:family="paragraph" style:name="P735">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00">
      <style:text-properties fo:color="#1f1f1f" fo:font-family="Arial" style:font-family-asian="Arial" style:font-family-complex="Arial" fo:font-size="14pt" fo:font-weight="bold"/>
    </style:style>
    <style:style style:family="paragraph" style:name="P736">
      <style:paragraph-properties fo:line-height="115%" fo:margin-left="0cm" fo:margin-right="0cm" fo:text-indent="0cm" fo:margin-top="0pt" fo:margin-bottom="0pt" fo:border="none"/>
      <style:text-properties/>
    </style:style>
    <style:style style:family="text" style:name="T1201">
      <style:text-properties fo:color="#1f1f1f" fo:font-family="Arial" style:font-family-asian="Arial" style:font-family-complex="Arial" fo:font-size="12pt"/>
    </style:style>
    <style:style style:family="paragraph" style:name="P737">
      <style:paragraph-properties fo:line-height="115%" fo:margin-left="0cm" fo:margin-right="0cm" fo:text-indent="0cm" fo:margin-top="0pt" fo:margin-bottom="0pt" fo:border="none"/>
      <style:text-properties/>
    </style:style>
    <style:style style:family="text" style:name="T1202">
      <style:text-properties fo:color="#1f1f1f" fo:font-family="Arial" style:font-family-asian="Arial" style:font-family-complex="Arial" fo:font-size="12pt"/>
    </style:style>
    <style:style style:family="paragraph" style:name="P738">
      <style:paragraph-properties fo:line-height="115%" fo:margin-left="0cm" fo:margin-right="0cm" fo:text-indent="0cm" fo:margin-top="0pt" fo:margin-bottom="0pt" fo:border="none"/>
      <style:text-properties/>
    </style:style>
    <style:style style:family="text" style:name="T1203">
      <style:text-properties fo:color="#1f1f1f" fo:font-family="Arial" style:font-family-asian="Arial" style:font-family-complex="Arial" fo:font-size="12pt"/>
    </style:style>
    <style:style style:family="paragraph" style:name="P739">
      <style:paragraph-properties fo:line-height="115%" fo:margin-left="0cm" fo:margin-right="0cm" fo:text-indent="0cm" fo:margin-top="0pt" fo:margin-bottom="0pt" fo:border="none"/>
      <style:text-properties/>
    </style:style>
    <style:style style:family="text" style:name="T1204">
      <style:text-properties fo:color="#1f1f1f" fo:font-family="Arial" style:font-family-asian="Arial" style:font-family-complex="Arial" fo:font-size="12pt"/>
    </style:style>
    <style:style style:family="text" style:name="T1205">
      <style:text-properties fo:color="#1f1f1f" fo:font-family="Arial" style:font-family-asian="Arial" style:font-family-complex="Arial" fo:font-size="12pt"/>
    </style:style>
    <style:style style:family="paragraph" style:name="P740">
      <style:paragraph-properties fo:line-height="115%" fo:margin-left="0cm" fo:margin-right="0cm" fo:text-indent="0cm" fo:margin-top="0pt" fo:margin-bottom="0pt" fo:border="none"/>
      <style:text-properties/>
    </style:style>
    <style:style style:family="text" style:name="T1206">
      <style:text-properties fo:color="#1f1f1f" fo:font-family="Arial" style:font-family-asian="Arial" style:font-family-complex="Arial" fo:font-size="12pt"/>
    </style:style>
    <style:style style:parent-style-name="141" style:family="paragraph" style:name="P74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07">
      <style:text-properties fo:color="#1f1f1f" fo:font-family="Arial" style:font-family-asian="Arial" style:font-family-complex="Arial" fo:font-size="14pt" fo:font-weight="bold"/>
    </style:style>
    <style:style style:parent-style-name="668" style:list-style-name="WWNum41" style:family="paragraph" style:name="P742">
      <style:paragraph-properties fo:line-height="115%" fo:margin-right="0cm" fo:margin-top="0pt" fo:margin-bottom="0pt" fo:border="none"/>
      <style:text-properties/>
    </style:style>
    <style:style style:family="text" style:name="T1208">
      <style:text-properties fo:color="#1f1f1f" fo:font-family="Arial" style:font-family-asian="Arial" style:font-family-complex="Arial" fo:font-size="12pt"/>
    </style:style>
    <style:style style:parent-style-name="668" style:list-style-name="WWNum41" style:family="paragraph" style:name="P743">
      <style:paragraph-properties fo:line-height="115%" fo:margin-right="0cm" fo:margin-top="0pt" fo:margin-bottom="0pt" fo:border="none"/>
      <style:text-properties/>
    </style:style>
    <style:style style:family="text" style:name="T1209">
      <style:text-properties fo:color="#1f1f1f" fo:font-family="Arial" style:font-family-asian="Arial" style:font-family-complex="Arial" fo:font-size="12pt"/>
    </style:style>
    <style:style style:parent-style-name="668" style:list-style-name="WWNum41" style:family="paragraph" style:name="P744">
      <style:paragraph-properties fo:line-height="115%" fo:margin-right="0cm" fo:margin-top="0pt" fo:margin-bottom="0pt" fo:border="none"/>
      <style:text-properties/>
    </style:style>
    <style:style style:family="text" style:name="T1210">
      <style:text-properties fo:color="#1f1f1f" fo:font-family="Arial" style:font-family-asian="Arial" style:font-family-complex="Arial" fo:font-size="12pt"/>
    </style:style>
    <style:style style:parent-style-name="668" style:list-style-name="WWNum41" style:family="paragraph" style:name="P745">
      <style:paragraph-properties fo:line-height="115%" fo:margin-right="0cm" fo:margin-top="0pt" fo:margin-bottom="0pt" fo:border="none"/>
      <style:text-properties/>
    </style:style>
    <style:style style:family="text" style:name="T1211">
      <style:text-properties fo:color="#1f1f1f" fo:font-family="Arial" style:font-family-asian="Arial" style:font-family-complex="Arial" fo:font-size="12pt"/>
    </style:style>
    <style:style style:family="paragraph" style:name="P746">
      <style:paragraph-properties/>
      <style:text-properties/>
    </style:style>
    <style:style style:parent-style-name="141" style:family="paragraph" style:name="P747">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212">
      <style:text-properties fo:color="#1f1f1f" fo:font-family="Arial" style:font-family-asian="Arial" style:font-family-complex="Arial" fo:font-size="14pt" fo:font-weight="bold"/>
    </style:style>
    <style:style style:family="paragraph" style:name="P748">
      <style:paragraph-properties fo:line-height="115%" fo:margin-left="0cm" fo:margin-right="0cm" fo:text-indent="0cm" fo:margin-top="0pt" fo:margin-bottom="0pt" fo:border="none"/>
      <style:text-properties/>
    </style:style>
    <style:style style:family="text" style:name="T1213">
      <style:text-properties fo:color="#1f1f1f" fo:font-family="Arial" style:font-family-asian="Arial" style:font-family-complex="Arial" fo:font-size="12pt"/>
    </style:style>
    <style:style style:parent-style-name="142" style:family="paragraph" style:name="P74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14">
      <style:text-properties fo:color="#1f1f1f" fo:font-family="Arial" style:font-family-asian="Arial" style:font-family-complex="Arial" fo:font-size="12pt" fo:font-weight="bold"/>
    </style:style>
    <style:style style:family="paragraph" style:name="P750">
      <style:paragraph-properties fo:line-height="115%" fo:margin-left="0cm" fo:margin-right="0cm" fo:text-indent="0cm" fo:margin-top="0pt" fo:margin-bottom="0pt" fo:border="none"/>
      <style:text-properties/>
    </style:style>
    <style:style style:family="text" style:name="T1215">
      <style:text-properties fo:color="#1f1f1f" fo:font-family="Arial" style:font-family-asian="Arial" style:font-family-complex="Arial" fo:font-size="12pt"/>
    </style:style>
    <style:style style:parent-style-name="142" style:family="paragraph" style:name="P75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16">
      <style:text-properties fo:color="#1f1f1f" fo:font-family="Arial" style:font-family-asian="Arial" style:font-family-complex="Arial" fo:font-size="12pt" fo:font-weight="bold"/>
    </style:style>
    <style:style style:family="paragraph" style:name="P752">
      <style:paragraph-properties fo:line-height="115%" fo:margin-left="0cm" fo:margin-right="0cm" fo:text-indent="0cm" fo:margin-top="0pt" fo:margin-bottom="0pt" fo:border="none"/>
      <style:text-properties/>
    </style:style>
    <style:style style:family="text" style:name="T1217">
      <style:text-properties fo:color="#1f1f1f" fo:font-family="Arial" style:font-family-asian="Arial" style:font-family-complex="Arial" fo:font-size="12pt"/>
    </style:style>
    <style:style style:parent-style-name="142" style:family="paragraph" style:name="P75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18">
      <style:text-properties fo:color="#1f1f1f" fo:font-family="Arial" style:font-family-asian="Arial" style:font-family-complex="Arial" fo:font-size="12pt" fo:font-weight="bold"/>
    </style:style>
    <style:style style:family="paragraph" style:name="P754">
      <style:paragraph-properties fo:line-height="115%" fo:margin-left="0cm" fo:margin-right="0cm" fo:text-indent="0cm" fo:margin-top="0pt" fo:margin-bottom="0pt" fo:border="none"/>
      <style:text-properties/>
    </style:style>
    <style:style style:family="text" style:name="T1219">
      <style:text-properties fo:color="#1f1f1f" fo:font-family="Arial" style:font-family-asian="Arial" style:font-family-complex="Arial" fo:font-size="12pt"/>
    </style:style>
    <style:style style:parent-style-name="142" style:family="paragraph" style:name="P75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20">
      <style:text-properties fo:color="#1f1f1f" fo:font-family="Arial" style:font-family-asian="Arial" style:font-family-complex="Arial" fo:font-size="12pt" fo:font-weight="bold"/>
    </style:style>
    <style:style style:family="paragraph" style:name="P756">
      <style:paragraph-properties fo:line-height="115%" fo:margin-left="0cm" fo:margin-right="0cm" fo:text-indent="0cm" fo:margin-top="0pt" fo:margin-bottom="0pt" fo:border="none"/>
      <style:text-properties/>
    </style:style>
    <style:style style:family="text" style:name="T1221">
      <style:text-properties fo:color="#1f1f1f" fo:font-family="Arial" style:font-family-asian="Arial" style:font-family-complex="Arial" fo:font-size="12pt"/>
    </style:style>
    <style:style style:parent-style-name="141" style:family="paragraph" style:name="P75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22">
      <style:text-properties fo:color="#1f1f1f" fo:font-family="Arial" style:font-family-asian="Arial" style:font-family-complex="Arial" fo:font-size="14pt" fo:font-weight="bold"/>
    </style:style>
    <style:style style:parent-style-name="668" style:list-style-name="WWNum42" style:family="paragraph" style:name="P758">
      <style:paragraph-properties fo:line-height="115%" fo:margin-right="0cm" fo:margin-top="0pt" fo:margin-bottom="0pt" fo:border="none"/>
      <style:text-properties/>
    </style:style>
    <style:style style:family="text" style:name="T1223">
      <style:text-properties fo:color="#1f1f1f" fo:font-family="Arial" style:font-family-asian="Arial" style:font-family-complex="Arial" fo:font-size="12pt"/>
    </style:style>
    <style:style style:parent-style-name="668" style:list-style-name="WWNum42" style:family="paragraph" style:name="P759">
      <style:paragraph-properties fo:line-height="115%" fo:margin-right="0cm" fo:margin-top="0pt" fo:margin-bottom="0pt" fo:border="none"/>
      <style:text-properties/>
    </style:style>
    <style:style style:family="text" style:name="T1224">
      <style:text-properties fo:color="#1f1f1f" fo:font-family="Arial" style:font-family-asian="Arial" style:font-family-complex="Arial" fo:font-size="12pt"/>
    </style:style>
    <style:style style:parent-style-name="668" style:list-style-name="WWNum42" style:family="paragraph" style:name="P760">
      <style:paragraph-properties fo:line-height="115%" fo:margin-right="0cm" fo:margin-top="0pt" fo:margin-bottom="0pt" fo:border="none"/>
      <style:text-properties/>
    </style:style>
    <style:style style:family="text" style:name="T1225">
      <style:text-properties fo:color="#1f1f1f" fo:font-family="Arial" style:font-family-asian="Arial" style:font-family-complex="Arial" fo:font-size="12pt"/>
    </style:style>
    <style:style style:parent-style-name="668" style:list-style-name="WWNum42" style:family="paragraph" style:name="P761">
      <style:paragraph-properties fo:line-height="115%" fo:margin-right="0cm" fo:margin-top="0pt" fo:margin-bottom="0pt" fo:border="none"/>
      <style:text-properties/>
    </style:style>
    <style:style style:family="text" style:name="T1226">
      <style:text-properties fo:color="#1f1f1f" fo:font-family="Arial" style:font-family-asian="Arial" style:font-family-complex="Arial" fo:font-size="12pt"/>
    </style:style>
    <style:style style:family="paragraph" style:name="P762">
      <style:paragraph-properties/>
      <style:text-properties/>
    </style:style>
    <style:style style:family="paragraph" style:name="P763">
      <style:paragraph-properties fo:line-height="115%" fo:margin-left="0cm" fo:margin-right="0cm" fo:text-indent="0cm" fo:margin-top="0pt" fo:margin-bottom="0pt" fo:break-before="page" fo:border="none"/>
      <style:text-properties/>
    </style:style>
    <style:style style:family="text" style:name="T1227">
      <style:text-properties fo:color="#1f1f1f" fo:font-family="Arial" style:font-family-asian="Arial" style:font-family-complex="Arial" fo:font-size="12pt"/>
    </style:style>
    <style:style style:parent-style-name="141" style:family="paragraph" style:name="P76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28">
      <style:text-properties fo:color="#1f1f1f" fo:font-family="Arial" style:font-family-asian="Arial" style:font-family-complex="Arial" fo:font-size="14pt" fo:font-weight="bold"/>
    </style:style>
    <style:style style:family="paragraph" style:name="P765">
      <style:paragraph-properties fo:line-height="115%" fo:margin-left="0cm" fo:margin-right="0cm" fo:text-indent="0cm" fo:margin-top="0pt" fo:margin-bottom="0pt" fo:border="none"/>
      <style:text-properties/>
    </style:style>
    <style:style style:family="text" style:name="T1229">
      <style:text-properties fo:color="#1f1f1f" fo:font-family="Arial" style:font-family-asian="Arial" style:font-family-complex="Arial" fo:font-size="12pt"/>
    </style:style>
    <style:style style:parent-style-name="142" style:family="paragraph" style:name="P76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30">
      <style:text-properties fo:color="#1f1f1f" fo:font-family="Arial" style:font-family-asian="Arial" style:font-family-complex="Arial" fo:font-size="12pt" fo:font-weight="bold"/>
    </style:style>
    <style:style style:family="paragraph" style:name="P767">
      <style:paragraph-properties fo:line-height="115%" fo:margin-left="0cm" fo:margin-right="0cm" fo:text-indent="0cm" fo:margin-top="0pt" fo:margin-bottom="0pt" fo:border="none"/>
      <style:text-properties/>
    </style:style>
    <style:style style:family="text" style:name="T1231">
      <style:text-properties fo:color="#1f1f1f" fo:font-family="Arial" style:font-family-asian="Arial" style:font-family-complex="Arial" fo:font-size="12pt"/>
    </style:style>
    <style:style style:parent-style-name="142" style:family="paragraph" style:name="P76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32">
      <style:text-properties fo:color="#1f1f1f" fo:font-family="Arial" style:font-family-asian="Arial" style:font-family-complex="Arial" fo:font-size="12pt" fo:font-weight="bold"/>
    </style:style>
    <style:style style:family="paragraph" style:name="P769">
      <style:paragraph-properties fo:line-height="115%" fo:margin-left="0cm" fo:margin-right="0cm" fo:text-indent="0cm" fo:margin-top="0pt" fo:margin-bottom="0pt" fo:border="none"/>
      <style:text-properties/>
    </style:style>
    <style:style style:family="text" style:name="T1233">
      <style:text-properties fo:color="#1f1f1f" fo:font-family="Arial" style:font-family-asian="Arial" style:font-family-complex="Arial" fo:font-size="12pt"/>
    </style:style>
    <style:style style:parent-style-name="142" style:family="paragraph" style:name="P77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34">
      <style:text-properties fo:color="#1f1f1f" fo:font-family="Arial" style:font-family-asian="Arial" style:font-family-complex="Arial" fo:font-size="12pt" fo:font-weight="bold"/>
    </style:style>
    <style:style style:family="paragraph" style:name="P771">
      <style:paragraph-properties fo:line-height="115%" fo:margin-left="0cm" fo:margin-right="0cm" fo:text-indent="0cm" fo:margin-top="0pt" fo:margin-bottom="0pt" fo:border="none"/>
      <style:text-properties/>
    </style:style>
    <style:style style:family="text" style:name="T1235">
      <style:text-properties fo:color="#1f1f1f" fo:font-family="Arial" style:font-family-asian="Arial" style:font-family-complex="Arial" fo:font-size="12pt"/>
    </style:style>
    <style:style style:parent-style-name="142" style:family="paragraph" style:name="P77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36">
      <style:text-properties fo:color="#1f1f1f" fo:font-family="Arial" style:font-family-asian="Arial" style:font-family-complex="Arial" fo:font-size="12pt" fo:font-weight="bold"/>
    </style:style>
    <style:style style:family="paragraph" style:name="P773">
      <style:paragraph-properties fo:line-height="115%" fo:margin-left="0cm" fo:margin-right="0cm" fo:text-indent="0cm" fo:margin-top="0pt" fo:margin-bottom="0pt" fo:border="none"/>
      <style:text-properties/>
    </style:style>
    <style:style style:family="text" style:name="T1237">
      <style:text-properties fo:color="#1f1f1f" fo:font-family="Arial" style:font-family-asian="Arial" style:font-family-complex="Arial" fo:font-size="12pt"/>
    </style:style>
    <style:style style:parent-style-name="141" style:family="paragraph" style:name="P77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38">
      <style:text-properties fo:color="#1f1f1f" fo:font-family="Arial" style:font-family-asian="Arial" style:font-family-complex="Arial" fo:font-size="14pt" fo:font-weight="bold"/>
    </style:style>
    <style:style style:parent-style-name="668" style:list-style-name="WWNum43" style:family="paragraph" style:name="P775">
      <style:paragraph-properties fo:line-height="115%" fo:margin-right="0cm" fo:margin-top="0pt" fo:margin-bottom="0pt" fo:border="none"/>
      <style:text-properties/>
    </style:style>
    <style:style style:family="text" style:name="T1239">
      <style:text-properties fo:color="#1f1f1f" fo:font-family="Arial" style:font-family-asian="Arial" style:font-family-complex="Arial" fo:font-size="12pt"/>
    </style:style>
    <style:style style:parent-style-name="668" style:list-style-name="WWNum43" style:family="paragraph" style:name="P776">
      <style:paragraph-properties fo:line-height="115%" fo:margin-right="0cm" fo:margin-top="0pt" fo:margin-bottom="0pt" fo:border="none"/>
      <style:text-properties/>
    </style:style>
    <style:style style:family="text" style:name="T1240">
      <style:text-properties fo:color="#1f1f1f" fo:font-family="Arial" style:font-family-asian="Arial" style:font-family-complex="Arial" fo:font-size="12pt"/>
    </style:style>
    <style:style style:parent-style-name="668" style:list-style-name="WWNum43" style:family="paragraph" style:name="P777">
      <style:paragraph-properties fo:line-height="115%" fo:margin-right="0cm" fo:margin-top="0pt" fo:margin-bottom="0pt" fo:border="none"/>
      <style:text-properties/>
    </style:style>
    <style:style style:family="text" style:name="T1241">
      <style:text-properties fo:color="#1f1f1f" fo:font-family="Arial" style:font-family-asian="Arial" style:font-family-complex="Arial" fo:font-size="12pt"/>
    </style:style>
    <style:style style:parent-style-name="668" style:list-style-name="WWNum43" style:family="paragraph" style:name="P778">
      <style:paragraph-properties fo:line-height="115%" fo:margin-right="0cm" fo:margin-top="0pt" fo:margin-bottom="0pt" fo:border="none"/>
      <style:text-properties/>
    </style:style>
    <style:style style:family="text" style:name="T1242">
      <style:text-properties fo:color="#1f1f1f" fo:font-family="Arial" style:font-family-asian="Arial" style:font-family-complex="Arial" fo:font-size="12pt"/>
    </style:style>
    <style:style style:family="paragraph" style:name="P779">
      <style:paragraph-properties/>
      <style:text-properties/>
    </style:style>
    <style:style style:parent-style-name="141" style:family="paragraph" style:name="P780">
      <style:paragraph-properties fo:line-height="115%" fo:margin-left="0cm" fo:margin-right="0cm" fo:text-indent="0cm" fo:margin-top="0pt" fo:break-before="page" fo:border="none"/>
      <style:text-properties fo:color="#0f4761" fo:font-family="Arial" style:font-family-asian="Arial" style:font-family-complex="Arial" fo:font-size="14pt" style:font-size-complex="14pt"/>
    </style:style>
    <style:style style:family="text" style:name="T1243">
      <style:text-properties fo:color="#1f1f1f" fo:font-family="Arial" style:font-family-asian="Arial" style:font-family-complex="Arial" fo:font-size="14pt" fo:font-weight="bold"/>
    </style:style>
    <style:style style:family="paragraph" style:name="P781">
      <style:paragraph-properties fo:line-height="115%" fo:margin-left="0cm" fo:margin-right="0cm" fo:text-indent="0cm" fo:margin-top="0pt" fo:margin-bottom="0pt" fo:border="none"/>
      <style:text-properties/>
    </style:style>
    <style:style style:family="text" style:name="T1244">
      <style:text-properties fo:color="#1f1f1f" fo:font-family="Arial" style:font-family-asian="Arial" style:font-family-complex="Arial" fo:font-size="12pt"/>
    </style:style>
    <style:style style:parent-style-name="142" style:family="paragraph" style:name="P78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45">
      <style:text-properties fo:color="#1f1f1f" fo:font-family="Arial" style:font-family-asian="Arial" style:font-family-complex="Arial" fo:font-size="12pt" fo:font-weight="bold"/>
    </style:style>
    <style:style style:family="paragraph" style:name="P783">
      <style:paragraph-properties fo:line-height="115%" fo:margin-left="0cm" fo:margin-right="0cm" fo:text-indent="0cm" fo:margin-top="0pt" fo:margin-bottom="0pt" fo:border="none"/>
      <style:text-properties/>
    </style:style>
    <style:style style:family="text" style:name="T1246">
      <style:text-properties fo:color="#1f1f1f" fo:font-family="Arial" style:font-family-asian="Arial" style:font-family-complex="Arial" fo:font-size="12pt"/>
    </style:style>
    <style:style style:parent-style-name="142" style:family="paragraph" style:name="P78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47">
      <style:text-properties fo:color="#1f1f1f" fo:font-family="Arial" style:font-family-asian="Arial" style:font-family-complex="Arial" fo:font-size="12pt" fo:font-weight="bold"/>
    </style:style>
    <style:style style:family="paragraph" style:name="P785">
      <style:paragraph-properties fo:line-height="115%" fo:margin-left="0cm" fo:margin-right="0cm" fo:text-indent="0cm" fo:margin-top="0pt" fo:margin-bottom="0pt" fo:border="none"/>
      <style:text-properties/>
    </style:style>
    <style:style style:family="text" style:name="T1248">
      <style:text-properties fo:color="#1f1f1f" fo:font-family="Arial" style:font-family-asian="Arial" style:font-family-complex="Arial" fo:font-size="12pt"/>
    </style:style>
    <style:style style:parent-style-name="142" style:family="paragraph" style:name="P78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49">
      <style:text-properties fo:color="#1f1f1f" fo:font-family="Arial" style:font-family-asian="Arial" style:font-family-complex="Arial" fo:font-size="12pt" fo:font-weight="bold"/>
    </style:style>
    <style:style style:family="paragraph" style:name="P787">
      <style:paragraph-properties fo:line-height="115%" fo:margin-left="0cm" fo:margin-right="0cm" fo:text-indent="0cm" fo:margin-top="0pt" fo:margin-bottom="0pt" fo:border="none"/>
      <style:text-properties/>
    </style:style>
    <style:style style:family="text" style:name="T1250">
      <style:text-properties fo:color="#1f1f1f" fo:font-family="Arial" style:font-family-asian="Arial" style:font-family-complex="Arial" fo:font-size="12pt"/>
    </style:style>
    <style:style style:parent-style-name="142" style:family="paragraph" style:name="P78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51">
      <style:text-properties fo:color="#1f1f1f" fo:font-family="Arial" style:font-family-asian="Arial" style:font-family-complex="Arial" fo:font-size="12pt" fo:font-weight="bold"/>
    </style:style>
    <style:style style:family="paragraph" style:name="P789">
      <style:paragraph-properties fo:line-height="115%" fo:margin-left="0cm" fo:margin-right="0cm" fo:text-indent="0cm" fo:margin-top="0pt" fo:margin-bottom="0pt" fo:border="none"/>
      <style:text-properties/>
    </style:style>
    <style:style style:family="text" style:name="T1252">
      <style:text-properties fo:color="#1f1f1f" fo:font-family="Arial" style:font-family-asian="Arial" style:font-family-complex="Arial" fo:font-size="12pt"/>
    </style:style>
    <style:style style:parent-style-name="141" style:family="paragraph" style:name="P79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53">
      <style:text-properties fo:color="#1f1f1f" fo:font-family="Arial" style:font-family-asian="Arial" style:font-family-complex="Arial" fo:font-size="14pt" fo:font-weight="bold"/>
    </style:style>
    <style:style style:parent-style-name="668" style:list-style-name="WWNum44" style:family="paragraph" style:name="P791">
      <style:paragraph-properties fo:line-height="115%" fo:margin-right="0cm" fo:margin-top="0pt" fo:margin-bottom="0pt" fo:border="none"/>
      <style:text-properties/>
    </style:style>
    <style:style style:family="text" style:name="T1254">
      <style:text-properties fo:color="#1f1f1f" fo:font-family="Arial" style:font-family-asian="Arial" style:font-family-complex="Arial" fo:font-size="12pt"/>
    </style:style>
    <style:style style:parent-style-name="668" style:list-style-name="WWNum44" style:family="paragraph" style:name="P792">
      <style:paragraph-properties fo:line-height="115%" fo:margin-right="0cm" fo:margin-top="0pt" fo:margin-bottom="0pt" fo:border="none"/>
      <style:text-properties/>
    </style:style>
    <style:style style:family="text" style:name="T1255">
      <style:text-properties fo:color="#1f1f1f" fo:font-family="Arial" style:font-family-asian="Arial" style:font-family-complex="Arial" fo:font-size="12pt"/>
    </style:style>
    <style:style style:parent-style-name="668" style:list-style-name="WWNum44" style:family="paragraph" style:name="P793">
      <style:paragraph-properties fo:line-height="115%" fo:margin-right="0cm" fo:margin-top="0pt" fo:margin-bottom="0pt" fo:border="none"/>
      <style:text-properties/>
    </style:style>
    <style:style style:family="text" style:name="T1256">
      <style:text-properties fo:color="#1f1f1f" fo:font-family="Arial" style:font-family-asian="Arial" style:font-family-complex="Arial" fo:font-size="12pt"/>
    </style:style>
    <style:style style:parent-style-name="668" style:list-style-name="WWNum44" style:family="paragraph" style:name="P794">
      <style:paragraph-properties fo:line-height="115%" fo:margin-right="0cm" fo:margin-top="0pt" fo:margin-bottom="0pt" fo:border="none"/>
      <style:text-properties/>
    </style:style>
    <style:style style:family="text" style:name="T1257">
      <style:text-properties fo:color="#1f1f1f" fo:font-family="Arial" style:font-family-asian="Arial" style:font-family-complex="Arial" fo:font-size="12pt"/>
    </style:style>
    <style:style style:family="paragraph" style:name="P795">
      <style:paragraph-properties/>
      <style:text-properties/>
    </style:style>
    <style:style style:family="paragraph" style:name="P796">
      <style:paragraph-properties fo:line-height="115%" fo:margin-left="0cm" fo:margin-right="0cm" fo:text-indent="0cm" fo:margin-top="0pt" fo:margin-bottom="0pt" fo:break-before="page" fo:border="none"/>
      <style:text-properties/>
    </style:style>
    <style:style style:family="text" style:name="T1258">
      <style:text-properties fo:color="#1f1f1f" fo:font-family="Arial" style:font-family-asian="Arial" style:font-family-complex="Arial" fo:font-size="12pt"/>
    </style:style>
    <style:style style:parent-style-name="141" style:family="paragraph" style:name="P79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59">
      <style:text-properties fo:color="#1f1f1f" fo:font-family="Arial" style:font-family-asian="Arial" style:font-family-complex="Arial" fo:font-size="14pt" fo:font-weight="bold"/>
    </style:style>
    <style:style style:family="paragraph" style:name="P798">
      <style:paragraph-properties fo:line-height="115%" fo:margin-left="0cm" fo:margin-right="0cm" fo:text-indent="0cm" fo:margin-top="0pt" fo:margin-bottom="0pt" fo:border="none"/>
      <style:text-properties/>
    </style:style>
    <style:style style:family="text" style:name="T1260">
      <style:text-properties fo:color="#1f1f1f" fo:font-family="Arial" style:font-family-asian="Arial" style:font-family-complex="Arial" fo:font-size="12pt"/>
    </style:style>
    <style:style style:parent-style-name="142" style:family="paragraph" style:name="P79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61">
      <style:text-properties fo:color="#1f1f1f" fo:font-family="Arial" style:font-family-asian="Arial" style:font-family-complex="Arial" fo:font-size="12pt" fo:font-weight="bold"/>
    </style:style>
    <style:style style:family="paragraph" style:name="P800">
      <style:paragraph-properties fo:line-height="115%" fo:margin-left="0cm" fo:margin-right="0cm" fo:text-indent="0cm" fo:margin-top="0pt" fo:margin-bottom="0pt" fo:border="none"/>
      <style:text-properties/>
    </style:style>
    <style:style style:family="text" style:name="T1262">
      <style:text-properties fo:color="#1f1f1f" fo:font-family="Arial" style:font-family-asian="Arial" style:font-family-complex="Arial" fo:font-size="12pt"/>
    </style:style>
    <style:style style:parent-style-name="142" style:family="paragraph" style:name="P80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63">
      <style:text-properties fo:color="#1f1f1f" fo:font-family="Arial" style:font-family-asian="Arial" style:font-family-complex="Arial" fo:font-size="12pt" fo:font-weight="bold"/>
    </style:style>
    <style:style style:family="paragraph" style:name="P802">
      <style:paragraph-properties fo:line-height="115%" fo:margin-left="0cm" fo:margin-right="0cm" fo:text-indent="0cm" fo:margin-top="0pt" fo:margin-bottom="0pt" fo:border="none"/>
      <style:text-properties/>
    </style:style>
    <style:style style:family="text" style:name="T1264">
      <style:text-properties fo:color="#1f1f1f" fo:font-family="Arial" style:font-family-asian="Arial" style:font-family-complex="Arial" fo:font-size="12pt"/>
    </style:style>
    <style:style style:parent-style-name="142" style:family="paragraph" style:name="P80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65">
      <style:text-properties fo:color="#1f1f1f" fo:font-family="Arial" style:font-family-asian="Arial" style:font-family-complex="Arial" fo:font-size="12pt" fo:font-weight="bold"/>
    </style:style>
    <style:style style:family="paragraph" style:name="P804">
      <style:paragraph-properties fo:line-height="115%" fo:margin-left="0cm" fo:margin-right="0cm" fo:text-indent="0cm" fo:margin-top="0pt" fo:margin-bottom="0pt" fo:border="none"/>
      <style:text-properties/>
    </style:style>
    <style:style style:family="text" style:name="T1266">
      <style:text-properties fo:color="#1f1f1f" fo:font-family="Arial" style:font-family-asian="Arial" style:font-family-complex="Arial" fo:font-size="12pt"/>
    </style:style>
    <style:style style:parent-style-name="142" style:family="paragraph" style:name="P80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67">
      <style:text-properties fo:color="#1f1f1f" fo:font-family="Arial" style:font-family-asian="Arial" style:font-family-complex="Arial" fo:font-size="12pt" fo:font-weight="bold"/>
    </style:style>
    <style:style style:family="paragraph" style:name="P806">
      <style:paragraph-properties fo:line-height="115%" fo:margin-left="0cm" fo:margin-right="0cm" fo:text-indent="0cm" fo:margin-top="0pt" fo:margin-bottom="0pt" fo:border="none"/>
      <style:text-properties/>
    </style:style>
    <style:style style:family="text" style:name="T1268">
      <style:text-properties fo:color="#1f1f1f" fo:font-family="Arial" style:font-family-asian="Arial" style:font-family-complex="Arial" fo:font-size="12pt"/>
    </style:style>
    <style:style style:parent-style-name="141" style:family="paragraph" style:name="P80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69">
      <style:text-properties fo:color="#1f1f1f" fo:font-family="Arial" style:font-family-asian="Arial" style:font-family-complex="Arial" fo:font-size="14pt" fo:font-weight="bold"/>
    </style:style>
    <style:style style:parent-style-name="668" style:list-style-name="WWNum45" style:family="paragraph" style:name="P808">
      <style:paragraph-properties fo:line-height="115%" fo:margin-right="0cm" fo:margin-top="0pt" fo:margin-bottom="0pt" fo:border="none"/>
      <style:text-properties/>
    </style:style>
    <style:style style:family="text" style:name="T1270">
      <style:text-properties fo:color="#1f1f1f" fo:font-family="Arial" style:font-family-asian="Arial" style:font-family-complex="Arial" fo:font-size="12pt"/>
    </style:style>
    <style:style style:parent-style-name="668" style:list-style-name="WWNum45" style:family="paragraph" style:name="P809">
      <style:paragraph-properties fo:line-height="115%" fo:margin-right="0cm" fo:margin-top="0pt" fo:margin-bottom="0pt" fo:border="none"/>
      <style:text-properties/>
    </style:style>
    <style:style style:family="text" style:name="T1271">
      <style:text-properties fo:color="#1f1f1f" fo:font-family="Arial" style:font-family-asian="Arial" style:font-family-complex="Arial" fo:font-size="12pt"/>
    </style:style>
    <style:style style:parent-style-name="668" style:list-style-name="WWNum45" style:family="paragraph" style:name="P810">
      <style:paragraph-properties fo:line-height="115%" fo:margin-right="0cm" fo:margin-top="0pt" fo:margin-bottom="0pt" fo:border="none"/>
      <style:text-properties/>
    </style:style>
    <style:style style:family="text" style:name="T1272">
      <style:text-properties fo:color="#1f1f1f" fo:font-family="Arial" style:font-family-asian="Arial" style:font-family-complex="Arial" fo:font-size="12pt"/>
    </style:style>
    <style:style style:parent-style-name="668" style:list-style-name="WWNum45" style:family="paragraph" style:name="P811">
      <style:paragraph-properties fo:line-height="115%" fo:margin-right="0cm" fo:margin-top="0pt" fo:margin-bottom="0pt" fo:border="none"/>
      <style:text-properties/>
    </style:style>
    <style:style style:family="text" style:name="T1273">
      <style:text-properties fo:color="#1f1f1f" fo:font-family="Arial" style:font-family-asian="Arial" style:font-family-complex="Arial" fo:font-size="12pt"/>
    </style:style>
    <style:style style:family="paragraph" style:name="P812">
      <style:paragraph-properties/>
      <style:text-properties/>
    </style:style>
    <style:style style:family="paragraph" style:name="P813">
      <style:paragraph-properties fo:line-height="115%" fo:margin-left="0cm" fo:margin-right="0cm" fo:text-indent="0cm" fo:margin-top="0pt" fo:margin-bottom="0pt" fo:break-before="page" fo:border="none"/>
      <style:text-properties/>
    </style:style>
    <style:style style:family="text" style:name="T1274">
      <style:text-properties fo:color="#1f1f1f" fo:font-family="Arial" style:font-family-asian="Arial" style:font-family-complex="Arial" fo:font-size="12pt"/>
    </style:style>
    <style:style style:parent-style-name="141" style:family="paragraph" style:name="P81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75">
      <style:text-properties fo:color="#1f1f1f" fo:font-family="Arial" style:font-family-asian="Arial" style:font-family-complex="Arial" fo:font-size="14pt" fo:font-weight="bold"/>
    </style:style>
    <style:style style:family="paragraph" style:name="P815">
      <style:paragraph-properties fo:line-height="115%" fo:margin-left="0cm" fo:margin-right="0cm" fo:text-indent="0cm" fo:margin-top="0pt" fo:margin-bottom="0pt" fo:border="none"/>
      <style:text-properties/>
    </style:style>
    <style:style style:family="text" style:name="T1276">
      <style:text-properties fo:color="#1f1f1f" fo:font-family="Arial" style:font-family-asian="Arial" style:font-family-complex="Arial" fo:font-size="12pt"/>
    </style:style>
    <style:style style:parent-style-name="142" style:family="paragraph" style:name="P81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77">
      <style:text-properties fo:color="#1f1f1f" fo:font-family="Arial" style:font-family-asian="Arial" style:font-family-complex="Arial" fo:font-size="12pt" fo:font-weight="bold"/>
    </style:style>
    <style:style style:family="paragraph" style:name="P817">
      <style:paragraph-properties fo:line-height="115%" fo:margin-left="0cm" fo:margin-right="0cm" fo:text-indent="0cm" fo:margin-top="0pt" fo:margin-bottom="0pt" fo:border="none"/>
      <style:text-properties/>
    </style:style>
    <style:style style:family="text" style:name="T1278">
      <style:text-properties fo:color="#1f1f1f" fo:font-family="Arial" style:font-family-asian="Arial" style:font-family-complex="Arial" fo:font-size="12pt"/>
    </style:style>
    <style:style style:parent-style-name="142" style:family="paragraph" style:name="P81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79">
      <style:text-properties fo:color="#1f1f1f" fo:font-family="Arial" style:font-family-asian="Arial" style:font-family-complex="Arial" fo:font-size="12pt" fo:font-weight="bold"/>
    </style:style>
    <style:style style:family="paragraph" style:name="P819">
      <style:paragraph-properties fo:line-height="115%" fo:margin-left="0cm" fo:margin-right="0cm" fo:text-indent="0cm" fo:margin-top="0pt" fo:margin-bottom="0pt" fo:border="none"/>
      <style:text-properties/>
    </style:style>
    <style:style style:family="text" style:name="T1280">
      <style:text-properties fo:color="#1f1f1f" fo:font-family="Arial" style:font-family-asian="Arial" style:font-family-complex="Arial" fo:font-size="12pt"/>
    </style:style>
    <style:style style:parent-style-name="142" style:family="paragraph" style:name="P82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81">
      <style:text-properties fo:color="#1f1f1f" fo:font-family="Arial" style:font-family-asian="Arial" style:font-family-complex="Arial" fo:font-size="12pt" fo:font-weight="bold"/>
    </style:style>
    <style:style style:family="paragraph" style:name="P821">
      <style:paragraph-properties fo:line-height="115%" fo:margin-left="0cm" fo:margin-right="0cm" fo:text-indent="0cm" fo:margin-top="0pt" fo:margin-bottom="0pt" fo:border="none"/>
      <style:text-properties/>
    </style:style>
    <style:style style:family="text" style:name="T1282">
      <style:text-properties fo:color="#1f1f1f" fo:font-family="Arial" style:font-family-asian="Arial" style:font-family-complex="Arial" fo:font-size="12pt"/>
    </style:style>
    <style:style style:parent-style-name="142" style:family="paragraph" style:name="P82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83">
      <style:text-properties fo:color="#1f1f1f" fo:font-family="Arial" style:font-family-asian="Arial" style:font-family-complex="Arial" fo:font-size="12pt" fo:font-weight="bold"/>
    </style:style>
    <style:style style:family="paragraph" style:name="P823">
      <style:paragraph-properties fo:line-height="115%" fo:margin-left="0cm" fo:margin-right="0cm" fo:text-indent="0cm" fo:margin-top="0pt" fo:margin-bottom="0pt" fo:border="none"/>
      <style:text-properties/>
    </style:style>
    <style:style style:family="text" style:name="T1284">
      <style:text-properties fo:color="#1f1f1f" fo:font-family="Arial" style:font-family-asian="Arial" style:font-family-complex="Arial" fo:font-size="12pt"/>
    </style:style>
    <style:style style:parent-style-name="141" style:family="paragraph" style:name="P82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85">
      <style:text-properties fo:color="#1f1f1f" fo:font-family="Arial" style:font-family-asian="Arial" style:font-family-complex="Arial" fo:font-size="14pt" fo:font-weight="bold"/>
    </style:style>
    <style:style style:parent-style-name="668" style:list-style-name="WWNum46" style:family="paragraph" style:name="P825">
      <style:paragraph-properties fo:line-height="115%" fo:margin-right="0cm" fo:margin-top="0pt" fo:margin-bottom="0pt" fo:border="none"/>
      <style:text-properties/>
    </style:style>
    <style:style style:family="text" style:name="T1286">
      <style:text-properties fo:color="#1f1f1f" fo:font-family="Arial" style:font-family-asian="Arial" style:font-family-complex="Arial" fo:font-size="12pt"/>
    </style:style>
    <style:style style:parent-style-name="668" style:list-style-name="WWNum46" style:family="paragraph" style:name="P826">
      <style:paragraph-properties fo:line-height="115%" fo:margin-right="0cm" fo:margin-top="0pt" fo:margin-bottom="0pt" fo:border="none"/>
      <style:text-properties/>
    </style:style>
    <style:style style:family="text" style:name="T1287">
      <style:text-properties fo:color="#1f1f1f" fo:font-family="Arial" style:font-family-asian="Arial" style:font-family-complex="Arial" fo:font-size="12pt"/>
    </style:style>
    <style:style style:parent-style-name="668" style:list-style-name="WWNum46" style:family="paragraph" style:name="P827">
      <style:paragraph-properties fo:line-height="115%" fo:margin-right="0cm" fo:margin-top="0pt" fo:margin-bottom="0pt" fo:border="none"/>
      <style:text-properties/>
    </style:style>
    <style:style style:family="text" style:name="T1288">
      <style:text-properties fo:color="#1f1f1f" fo:font-family="Arial" style:font-family-asian="Arial" style:font-family-complex="Arial" fo:font-size="12pt"/>
    </style:style>
    <style:style style:parent-style-name="668" style:list-style-name="WWNum46" style:family="paragraph" style:name="P828">
      <style:paragraph-properties fo:line-height="115%" fo:margin-right="0cm" fo:margin-top="0pt" fo:margin-bottom="0pt" fo:border="none"/>
      <style:text-properties/>
    </style:style>
    <style:style style:family="text" style:name="T1289">
      <style:text-properties fo:color="#1f1f1f" fo:font-family="Arial" style:font-family-asian="Arial" style:font-family-complex="Arial" fo:font-size="12pt"/>
    </style:style>
    <style:style style:family="paragraph" style:name="P829">
      <style:paragraph-properties/>
      <style:text-properties/>
    </style:style>
    <style:style style:family="paragraph" style:name="P830">
      <style:paragraph-properties fo:line-height="115%" fo:margin-left="0cm" fo:margin-right="0cm" fo:text-indent="0cm" fo:margin-top="0pt" fo:margin-bottom="0pt" fo:break-before="page" fo:border="none"/>
      <style:text-properties/>
    </style:style>
    <style:style style:family="text" style:name="T1290">
      <style:text-properties fo:color="#1f1f1f" fo:font-family="Arial" style:font-family-asian="Arial" style:font-family-complex="Arial" fo:font-size="12pt"/>
    </style:style>
    <style:style style:parent-style-name="141" style:family="paragraph" style:name="P83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291">
      <style:text-properties fo:color="#1f1f1f" fo:font-family="Arial" style:font-family-asian="Arial" style:font-family-complex="Arial" fo:font-size="14pt" fo:font-weight="bold"/>
    </style:style>
    <style:style style:family="paragraph" style:name="P832">
      <style:paragraph-properties fo:line-height="115%" fo:margin-left="0cm" fo:margin-right="0cm" fo:text-indent="0cm" fo:margin-top="0pt" fo:margin-bottom="0pt" fo:border="none"/>
      <style:text-properties/>
    </style:style>
    <style:style style:family="text" style:name="T1292">
      <style:text-properties fo:color="#1f1f1f" fo:font-family="Arial" style:font-family-asian="Arial" style:font-family-complex="Arial" fo:font-size="12pt"/>
    </style:style>
    <style:style style:parent-style-name="142" style:family="paragraph" style:name="P83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93">
      <style:text-properties fo:color="#1f1f1f" fo:font-family="Arial" style:font-family-asian="Arial" style:font-family-complex="Arial" fo:font-size="12pt" fo:font-weight="bold"/>
    </style:style>
    <style:style style:family="paragraph" style:name="P834">
      <style:paragraph-properties fo:line-height="115%" fo:margin-left="0cm" fo:margin-right="0cm" fo:text-indent="0cm" fo:margin-top="0pt" fo:margin-bottom="0pt" fo:border="none"/>
      <style:text-properties/>
    </style:style>
    <style:style style:family="text" style:name="T1294">
      <style:text-properties fo:color="#1f1f1f" fo:font-family="Arial" style:font-family-asian="Arial" style:font-family-complex="Arial" fo:font-size="12pt"/>
    </style:style>
    <style:style style:family="text" style:name="T1295">
      <style:text-properties fo:color="#1f1f1f" fo:font-family="Arial" style:font-family-asian="Arial" style:font-family-complex="Arial" fo:font-size="12pt"/>
    </style:style>
    <style:style style:parent-style-name="142" style:family="paragraph" style:name="P83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96">
      <style:text-properties fo:color="#1f1f1f" fo:font-family="Arial" style:font-family-asian="Arial" style:font-family-complex="Arial" fo:font-size="12pt" fo:font-weight="bold"/>
    </style:style>
    <style:style style:family="paragraph" style:name="P836">
      <style:paragraph-properties fo:line-height="115%" fo:margin-left="0cm" fo:margin-right="0cm" fo:text-indent="0cm" fo:margin-top="0pt" fo:margin-bottom="0pt" fo:border="none"/>
      <style:text-properties/>
    </style:style>
    <style:style style:family="text" style:name="T1297">
      <style:text-properties fo:color="#1f1f1f" fo:font-family="Arial" style:font-family-asian="Arial" style:font-family-complex="Arial" fo:font-size="12pt"/>
    </style:style>
    <style:style style:family="text" style:name="T1298">
      <style:text-properties fo:color="#1f1f1f" fo:font-family="Arial" style:font-family-asian="Arial" style:font-family-complex="Arial" fo:font-size="12pt"/>
    </style:style>
    <style:style style:parent-style-name="142" style:family="paragraph" style:name="P837">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299">
      <style:text-properties fo:color="#1f1f1f" fo:font-family="Arial" style:font-family-asian="Arial" style:font-family-complex="Arial" fo:font-size="12pt" fo:font-weight="bold"/>
    </style:style>
    <style:style style:family="paragraph" style:name="P838">
      <style:paragraph-properties fo:line-height="115%" fo:margin-left="0cm" fo:margin-right="0cm" fo:text-indent="0cm" fo:margin-top="0pt" fo:margin-bottom="0pt" fo:border="none"/>
      <style:text-properties/>
    </style:style>
    <style:style style:family="text" style:name="T1300">
      <style:text-properties fo:color="#1f1f1f" fo:font-family="Arial" style:font-family-asian="Arial" style:font-family-complex="Arial" fo:font-size="12pt"/>
    </style:style>
    <style:style style:family="text" style:name="T1301">
      <style:text-properties fo:color="#1f1f1f" fo:font-family="Arial" style:font-family-asian="Arial" style:font-family-complex="Arial" fo:font-size="12pt"/>
    </style:style>
    <style:style style:parent-style-name="142" style:family="paragraph" style:name="P83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02">
      <style:text-properties fo:color="#1f1f1f" fo:font-family="Arial" style:font-family-asian="Arial" style:font-family-complex="Arial" fo:font-size="12pt" fo:font-weight="bold"/>
    </style:style>
    <style:style style:family="paragraph" style:name="P840">
      <style:paragraph-properties fo:line-height="115%" fo:margin-left="0cm" fo:margin-right="0cm" fo:text-indent="0cm" fo:margin-top="0pt" fo:margin-bottom="0pt" fo:border="none"/>
      <style:text-properties/>
    </style:style>
    <style:style style:family="text" style:name="T1303">
      <style:text-properties fo:color="#1f1f1f" fo:font-family="Arial" style:font-family-asian="Arial" style:font-family-complex="Arial" fo:font-size="12pt"/>
    </style:style>
    <style:style style:family="text" style:name="T1304">
      <style:text-properties fo:color="#1f1f1f" fo:font-family="Arial" style:font-family-asian="Arial" style:font-family-complex="Arial" fo:font-size="12pt"/>
    </style:style>
    <style:style style:parent-style-name="141" style:family="paragraph" style:name="P841">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05">
      <style:text-properties fo:color="#1f1f1f" fo:font-family="Arial" style:font-family-asian="Arial" style:font-family-complex="Arial" fo:font-size="14pt" fo:font-weight="bold"/>
    </style:style>
    <style:style style:parent-style-name="668" style:list-style-name="WWNum47" style:family="paragraph" style:name="P842">
      <style:paragraph-properties fo:line-height="115%" fo:margin-right="0cm" fo:margin-top="0pt" fo:margin-bottom="0pt" fo:border="none"/>
      <style:text-properties/>
    </style:style>
    <style:style style:family="text" style:name="T1306">
      <style:text-properties fo:color="#1f1f1f" fo:font-family="Arial" style:font-family-asian="Arial" style:font-family-complex="Arial" fo:font-size="12pt"/>
    </style:style>
    <style:style style:parent-style-name="668" style:list-style-name="WWNum47" style:family="paragraph" style:name="P843">
      <style:paragraph-properties fo:line-height="115%" fo:margin-right="0cm" fo:margin-top="0pt" fo:margin-bottom="0pt" fo:border="none"/>
      <style:text-properties/>
    </style:style>
    <style:style style:family="text" style:name="T1307">
      <style:text-properties fo:color="#1f1f1f" fo:font-family="Arial" style:font-family-asian="Arial" style:font-family-complex="Arial" fo:font-size="12pt"/>
    </style:style>
    <style:style style:parent-style-name="668" style:list-style-name="WWNum47" style:family="paragraph" style:name="P844">
      <style:paragraph-properties fo:line-height="115%" fo:margin-right="0cm" fo:margin-top="0pt" fo:margin-bottom="0pt" fo:border="none"/>
      <style:text-properties/>
    </style:style>
    <style:style style:family="text" style:name="T1308">
      <style:text-properties fo:color="#1f1f1f" fo:font-family="Arial" style:font-family-asian="Arial" style:font-family-complex="Arial" fo:font-size="12pt"/>
    </style:style>
    <style:style style:parent-style-name="668" style:list-style-name="WWNum47" style:family="paragraph" style:name="P845">
      <style:paragraph-properties fo:line-height="115%" fo:margin-right="0cm" fo:margin-top="0pt" fo:margin-bottom="0pt" fo:border="none"/>
      <style:text-properties/>
    </style:style>
    <style:style style:family="text" style:name="T1309">
      <style:text-properties fo:color="#1f1f1f" fo:font-family="Arial" style:font-family-asian="Arial" style:font-family-complex="Arial" fo:font-size="12pt"/>
    </style:style>
    <style:style style:family="paragraph" style:name="P846">
      <style:paragraph-properties/>
      <style:text-properties/>
    </style:style>
    <style:style style:family="paragraph" style:name="P847">
      <style:paragraph-properties fo:line-height="115%" fo:margin-left="0cm" fo:margin-right="0cm" fo:text-indent="0cm" fo:margin-top="0pt" fo:margin-bottom="0pt" fo:break-before="page" fo:border="none"/>
      <style:text-properties/>
    </style:style>
    <style:style style:family="text" style:name="T1310">
      <style:text-properties fo:color="#1f1f1f" fo:font-family="Arial" style:font-family-asian="Arial" style:font-family-complex="Arial" fo:font-size="12pt"/>
    </style:style>
    <style:style style:parent-style-name="141" style:family="paragraph" style:name="P848">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11">
      <style:text-properties fo:color="#1f1f1f" fo:font-family="Arial" style:font-family-asian="Arial" style:font-family-complex="Arial" fo:font-size="14pt" fo:font-weight="bold"/>
    </style:style>
    <style:style style:family="paragraph" style:name="P849">
      <style:paragraph-properties fo:line-height="115%" fo:margin-left="0cm" fo:margin-right="0cm" fo:text-indent="0cm" fo:margin-top="0pt" fo:margin-bottom="0pt" fo:border="none"/>
      <style:text-properties/>
    </style:style>
    <style:style style:family="text" style:name="T1312">
      <style:text-properties fo:color="#1f1f1f" fo:font-family="Arial" style:font-family-asian="Arial" style:font-family-complex="Arial" fo:font-size="12pt"/>
    </style:style>
    <style:style style:parent-style-name="142" style:family="paragraph" style:name="P85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13">
      <style:text-properties fo:color="#1f1f1f" fo:font-family="Arial" style:font-family-asian="Arial" style:font-family-complex="Arial" fo:font-size="12pt" fo:font-weight="bold"/>
    </style:style>
    <style:style style:family="paragraph" style:name="P851">
      <style:paragraph-properties fo:line-height="115%" fo:margin-left="0cm" fo:margin-right="0cm" fo:text-indent="0cm" fo:margin-top="0pt" fo:margin-bottom="0pt" fo:border="none"/>
      <style:text-properties/>
    </style:style>
    <style:style style:family="text" style:name="T1314">
      <style:text-properties fo:color="#1f1f1f" fo:font-family="Arial" style:font-family-asian="Arial" style:font-family-complex="Arial" fo:font-size="12pt"/>
    </style:style>
    <style:style style:parent-style-name="142" style:family="paragraph" style:name="P85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15">
      <style:text-properties fo:color="#1f1f1f" fo:font-family="Arial" style:font-family-asian="Arial" style:font-family-complex="Arial" fo:font-size="12pt" fo:font-weight="bold"/>
    </style:style>
    <style:style style:family="paragraph" style:name="P853">
      <style:paragraph-properties fo:line-height="115%" fo:margin-left="0cm" fo:margin-right="0cm" fo:text-indent="0cm" fo:margin-top="0pt" fo:margin-bottom="0pt" fo:border="none"/>
      <style:text-properties/>
    </style:style>
    <style:style style:family="text" style:name="T1316">
      <style:text-properties fo:color="#1f1f1f" fo:font-family="Arial" style:font-family-asian="Arial" style:font-family-complex="Arial" fo:font-size="12pt"/>
    </style:style>
    <style:style style:family="text" style:name="T1317">
      <style:text-properties fo:color="#1f1f1f" fo:font-family="Arial" style:font-family-asian="Arial" style:font-family-complex="Arial" fo:font-size="12pt"/>
    </style:style>
    <style:style style:parent-style-name="142" style:family="paragraph" style:name="P854">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18">
      <style:text-properties fo:color="#1f1f1f" fo:font-family="Arial" style:font-family-asian="Arial" style:font-family-complex="Arial" fo:font-size="12pt" fo:font-weight="bold"/>
    </style:style>
    <style:style style:family="paragraph" style:name="P855">
      <style:paragraph-properties fo:line-height="115%" fo:margin-left="0cm" fo:margin-right="0cm" fo:text-indent="0cm" fo:margin-top="0pt" fo:margin-bottom="0pt" fo:border="none"/>
      <style:text-properties/>
    </style:style>
    <style:style style:family="text" style:name="T1319">
      <style:text-properties fo:color="#1f1f1f" fo:font-family="Arial" style:font-family-asian="Arial" style:font-family-complex="Arial" fo:font-size="12pt"/>
    </style:style>
    <style:style style:parent-style-name="142" style:family="paragraph" style:name="P85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20">
      <style:text-properties fo:color="#1f1f1f" fo:font-family="Arial" style:font-family-asian="Arial" style:font-family-complex="Arial" fo:font-size="12pt" fo:font-weight="bold"/>
    </style:style>
    <style:style style:family="paragraph" style:name="P857">
      <style:paragraph-properties fo:line-height="115%" fo:margin-left="0cm" fo:margin-right="0cm" fo:text-indent="0cm" fo:margin-top="0pt" fo:margin-bottom="0pt" fo:border="none"/>
      <style:text-properties/>
    </style:style>
    <style:style style:family="text" style:name="T1321">
      <style:text-properties fo:color="#1f1f1f" fo:font-family="Arial" style:font-family-asian="Arial" style:font-family-complex="Arial" fo:font-size="12pt"/>
    </style:style>
    <style:style style:family="table" style:name="ta5">
      <style:paragraph-properties fo:line-height="100%" fo:margin-bottom="0pt"/>
      <style:table-properties style:width="8.552cm" fo:margin-left="0cm" table:align="left" style:use-optimal-column-width="true"/>
    </style:style>
    <style:style style:family="table-column" style:name="co13">
      <style:table-column-properties style:column-width="1.439cm" style:use-optimal-column-width="true"/>
    </style:style>
    <style:style style:family="table-column" style:name="co14">
      <style:table-column-properties style:column-width="2.949cm" style:use-optimal-column-width="true"/>
    </style:style>
    <style:style style:family="table-column" style:name="co15">
      <style:table-column-properties style:column-width="4.163cm" style:use-optimal-column-width="true"/>
    </style:style>
    <style:style style:family="table-row" style:name="ro14">
      <style:table-row-properties/>
    </style:style>
    <style:style style:family="table-cell" style:name="ce4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58">
      <style:paragraph-properties style:line-height-at-least="12pt" fo:margin-top="0pt" fo:margin-bottom="0pt"/>
      <style:text-properties/>
    </style:style>
    <style:style style:family="text" style:name="T1322">
      <style:text-properties fo:color="#1f1f1f" fo:font-family="Arial" style:font-family-asian="Arial" style:font-family-complex="Arial" fo:font-size="12pt" fo:font-weight="bold"/>
    </style:style>
    <style:style style:family="table-cell" style:name="ce4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59">
      <style:paragraph-properties style:line-height-at-least="12pt" fo:margin-top="0pt" fo:margin-bottom="0pt"/>
      <style:text-properties/>
    </style:style>
    <style:style style:family="text" style:name="T1323">
      <style:text-properties fo:color="#1f1f1f" fo:font-family="Arial" style:font-family-asian="Arial" style:font-family-complex="Arial" fo:font-size="12pt" fo:font-weight="bold"/>
    </style:style>
    <style:style style:family="table-cell" style:name="ce47">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0">
      <style:paragraph-properties style:line-height-at-least="12pt" fo:margin-top="0pt" fo:margin-bottom="0pt"/>
      <style:text-properties/>
    </style:style>
    <style:style style:family="text" style:name="T1324">
      <style:text-properties fo:color="#1f1f1f" fo:font-family="Arial" style:font-family-asian="Arial" style:font-family-complex="Arial" fo:font-size="12pt" fo:font-weight="bold"/>
    </style:style>
    <style:style style:family="table-row" style:name="ro15">
      <style:table-row-properties/>
    </style:style>
    <style:style style:family="table-cell" style:name="ce48">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1">
      <style:paragraph-properties style:line-height-at-least="12pt" fo:margin-top="0pt" fo:margin-bottom="0pt"/>
      <style:text-properties/>
    </style:style>
    <style:style style:family="text" style:name="T1325">
      <style:text-properties fo:color="#1f1f1f" fo:font-family="Arial" style:font-family-asian="Arial" style:font-family-complex="Arial" fo:font-size="12pt"/>
    </style:style>
    <style:style style:family="table-cell" style:name="ce49">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2">
      <style:paragraph-properties style:line-height-at-least="12pt" fo:margin-top="0pt" fo:margin-bottom="0pt"/>
      <style:text-properties/>
    </style:style>
    <style:style style:family="text" style:name="T1326">
      <style:text-properties fo:color="#1f1f1f" fo:font-family="Arial" style:font-family-asian="Arial" style:font-family-complex="Arial" fo:font-size="12pt"/>
    </style:style>
    <style:style style:family="table-cell" style:name="ce50">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3">
      <style:paragraph-properties style:line-height-at-least="12pt" fo:margin-top="0pt" fo:margin-bottom="0pt"/>
      <style:text-properties/>
    </style:style>
    <style:style style:family="text" style:name="T1327">
      <style:text-properties fo:color="#1f1f1f" fo:font-family="Arial" style:font-family-asian="Arial" style:font-family-complex="Arial" fo:font-size="12pt"/>
    </style:style>
    <style:style style:family="table-row" style:name="ro16">
      <style:table-row-properties/>
    </style:style>
    <style:style style:family="table-cell" style:name="ce51">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4">
      <style:paragraph-properties style:line-height-at-least="12pt" fo:margin-top="0pt" fo:margin-bottom="0pt"/>
      <style:text-properties/>
    </style:style>
    <style:style style:family="text" style:name="T1328">
      <style:text-properties fo:color="#1f1f1f" fo:font-family="Arial" style:font-family-asian="Arial" style:font-family-complex="Arial" fo:font-size="12pt"/>
    </style:style>
    <style:style style:family="table-cell" style:name="ce52">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5">
      <style:paragraph-properties style:line-height-at-least="12pt" fo:margin-top="0pt" fo:margin-bottom="0pt"/>
      <style:text-properties/>
    </style:style>
    <style:style style:family="text" style:name="T1329">
      <style:text-properties fo:color="#1f1f1f" fo:font-family="Arial" style:font-family-asian="Arial" style:font-family-complex="Arial" fo:font-size="12pt"/>
    </style:style>
    <style:style style:family="table-cell" style:name="ce53">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6">
      <style:paragraph-properties style:line-height-at-least="12pt" fo:margin-top="0pt" fo:margin-bottom="0pt"/>
      <style:text-properties/>
    </style:style>
    <style:style style:family="text" style:name="T1330">
      <style:text-properties fo:color="#1f1f1f" fo:font-family="Arial" style:font-family-asian="Arial" style:font-family-complex="Arial" fo:font-size="12pt"/>
    </style:style>
    <style:style style:family="table-row" style:name="ro17">
      <style:table-row-properties/>
    </style:style>
    <style:style style:family="table-cell" style:name="ce54">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7">
      <style:paragraph-properties style:line-height-at-least="12pt" fo:margin-top="0pt" fo:margin-bottom="0pt"/>
      <style:text-properties/>
    </style:style>
    <style:style style:family="text" style:name="T1331">
      <style:text-properties fo:color="#1f1f1f" fo:font-family="Arial" style:font-family-asian="Arial" style:font-family-complex="Arial" fo:font-size="12pt"/>
    </style:style>
    <style:style style:family="table-cell" style:name="ce55">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8">
      <style:paragraph-properties style:line-height-at-least="12pt" fo:margin-top="0pt" fo:margin-bottom="0pt"/>
      <style:text-properties/>
    </style:style>
    <style:style style:family="text" style:name="T1332">
      <style:text-properties fo:color="#1f1f1f" fo:font-family="Arial" style:font-family-asian="Arial" style:font-family-complex="Arial" fo:font-size="12pt"/>
    </style:style>
    <style:style style:family="table-cell" style:name="ce56">
      <style:table-cell-properties style:vertical-align="middle" fo:border="0.02646cm solid #C4C7C5" fo:padding-top="0.2117cm" fo:padding-bottom="0.2117cm" fo:padding-left="0.3175cm" fo:padding-right="0.3175cm"/>
      <style:paragraph-properties fo:line-height="100%" fo:margin-bottom="0pt"/>
      <style:text-properties/>
    </style:style>
    <style:style style:family="paragraph" style:name="P869">
      <style:paragraph-properties style:line-height-at-least="12pt" fo:margin-top="0pt" fo:margin-bottom="0pt"/>
      <style:text-properties/>
    </style:style>
    <style:style style:family="text" style:name="T1333">
      <style:text-properties fo:color="#1f1f1f" fo:font-family="Arial" style:font-family-asian="Arial" style:font-family-complex="Arial" fo:font-size="12pt"/>
    </style:style>
    <style:style style:parent-style-name="141" style:family="paragraph" style:name="P870">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34">
      <style:text-properties fo:color="#1f1f1f" fo:font-family="Arial" style:font-family-asian="Arial" style:font-family-complex="Arial" fo:font-size="14pt" fo:font-weight="bold"/>
    </style:style>
    <style:style style:parent-style-name="668" style:list-style-name="WWNum48" style:family="paragraph" style:name="P871">
      <style:paragraph-properties fo:line-height="115%" fo:margin-right="0cm" fo:margin-top="0pt" fo:margin-bottom="0pt" fo:border="none"/>
      <style:text-properties/>
    </style:style>
    <style:style style:family="text" style:name="T1335">
      <style:text-properties fo:color="#1f1f1f" fo:font-family="Arial" style:font-family-asian="Arial" style:font-family-complex="Arial" fo:font-size="12pt"/>
    </style:style>
    <style:style style:parent-style-name="668" style:list-style-name="WWNum48" style:family="paragraph" style:name="P872">
      <style:paragraph-properties fo:line-height="115%" fo:margin-right="0cm" fo:margin-top="0pt" fo:margin-bottom="0pt" fo:border="none"/>
      <style:text-properties/>
    </style:style>
    <style:style style:family="text" style:name="T1336">
      <style:text-properties fo:color="#1f1f1f" fo:font-family="Arial" style:font-family-asian="Arial" style:font-family-complex="Arial" fo:font-size="12pt"/>
    </style:style>
    <style:style style:parent-style-name="668" style:list-style-name="WWNum48" style:family="paragraph" style:name="P873">
      <style:paragraph-properties fo:line-height="115%" fo:margin-right="0cm" fo:margin-top="0pt" fo:margin-bottom="0pt" fo:border="none"/>
      <style:text-properties/>
    </style:style>
    <style:style style:family="text" style:name="T1337">
      <style:text-properties fo:color="#1f1f1f" fo:font-family="Arial" style:font-family-asian="Arial" style:font-family-complex="Arial" fo:font-size="12pt"/>
    </style:style>
    <style:style style:parent-style-name="668" style:list-style-name="WWNum48" style:family="paragraph" style:name="P874">
      <style:paragraph-properties fo:line-height="115%" fo:margin-right="0cm" fo:margin-top="0pt" fo:margin-bottom="0pt" fo:border="none"/>
      <style:text-properties/>
    </style:style>
    <style:style style:family="text" style:name="T1338">
      <style:text-properties fo:color="#1f1f1f" fo:font-family="Arial" style:font-family-asian="Arial" style:font-family-complex="Arial" fo:font-size="12pt"/>
    </style:style>
    <style:style style:family="paragraph" style:name="P875">
      <style:paragraph-properties/>
      <style:text-properties/>
    </style:style>
    <style:style style:family="paragraph" style:name="P876">
      <style:paragraph-properties fo:line-height="115%" fo:margin-left="0cm" fo:margin-right="0cm" fo:text-indent="0cm" fo:margin-top="0pt" fo:margin-bottom="0pt" fo:break-before="page" fo:border="none"/>
      <style:text-properties/>
    </style:style>
    <style:style style:family="text" style:name="T1339">
      <style:text-properties fo:color="#1f1f1f" fo:font-family="Arial" style:font-family-asian="Arial" style:font-family-complex="Arial" fo:font-size="12pt"/>
    </style:style>
    <style:style style:parent-style-name="141" style:family="paragraph" style:name="P87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40">
      <style:text-properties fo:color="#1f1f1f" fo:font-family="Arial" style:font-family-asian="Arial" style:font-family-complex="Arial" fo:font-size="14pt" fo:font-weight="bold"/>
    </style:style>
    <style:style style:family="paragraph" style:name="P878">
      <style:paragraph-properties fo:line-height="115%" fo:margin-left="0cm" fo:margin-right="0cm" fo:text-indent="0cm" fo:margin-top="0pt" fo:margin-bottom="0pt" fo:border="none"/>
      <style:text-properties/>
    </style:style>
    <style:style style:family="text" style:name="T1341">
      <style:text-properties fo:color="#1f1f1f" fo:font-family="Arial" style:font-family-asian="Arial" style:font-family-complex="Arial" fo:font-size="12pt"/>
    </style:style>
    <style:style style:parent-style-name="142" style:family="paragraph" style:name="P879">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42">
      <style:text-properties fo:color="#1f1f1f" fo:font-family="Arial" style:font-family-asian="Arial" style:font-family-complex="Arial" fo:font-size="12pt" fo:font-weight="bold"/>
    </style:style>
    <style:style style:family="paragraph" style:name="P880">
      <style:paragraph-properties fo:line-height="115%" fo:margin-left="0cm" fo:margin-right="0cm" fo:text-indent="0cm" fo:margin-top="0pt" fo:margin-bottom="0pt" fo:border="none"/>
      <style:text-properties/>
    </style:style>
    <style:style style:family="text" style:name="T1343">
      <style:text-properties fo:color="#1f1f1f" fo:font-family="Arial" style:font-family-asian="Arial" style:font-family-complex="Arial" fo:font-size="12pt"/>
    </style:style>
    <style:style style:parent-style-name="142" style:family="paragraph" style:name="P881">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44">
      <style:text-properties fo:color="#1f1f1f" fo:font-family="Arial" style:font-family-asian="Arial" style:font-family-complex="Arial" fo:font-size="12pt" fo:font-weight="bold"/>
    </style:style>
    <style:style style:family="paragraph" style:name="P882">
      <style:paragraph-properties fo:line-height="115%" fo:margin-left="0cm" fo:margin-right="0cm" fo:text-indent="0cm" fo:margin-top="0pt" fo:margin-bottom="0pt" fo:border="none"/>
      <style:text-properties/>
    </style:style>
    <style:style style:family="text" style:name="T1345">
      <style:text-properties fo:color="#1f1f1f" fo:font-family="Arial" style:font-family-asian="Arial" style:font-family-complex="Arial" fo:font-size="12pt"/>
    </style:style>
    <style:style style:parent-style-name="142" style:family="paragraph" style:name="P883">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46">
      <style:text-properties fo:color="#1f1f1f" fo:font-family="Arial" style:font-family-asian="Arial" style:font-family-complex="Arial" fo:font-size="12pt" fo:font-weight="bold"/>
    </style:style>
    <style:style style:family="paragraph" style:name="P884">
      <style:paragraph-properties fo:line-height="115%" fo:margin-left="0cm" fo:margin-right="0cm" fo:text-indent="0cm" fo:margin-top="0pt" fo:margin-bottom="0pt" fo:border="none"/>
      <style:text-properties/>
    </style:style>
    <style:style style:family="text" style:name="T1347">
      <style:text-properties fo:color="#1f1f1f" fo:font-family="Arial" style:font-family-asian="Arial" style:font-family-complex="Arial" fo:font-size="12pt"/>
    </style:style>
    <style:style style:parent-style-name="142" style:family="paragraph" style:name="P885">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48">
      <style:text-properties fo:color="#1f1f1f" fo:font-family="Arial" style:font-family-asian="Arial" style:font-family-complex="Arial" fo:font-size="12pt" fo:font-weight="bold"/>
    </style:style>
    <style:style style:family="paragraph" style:name="P886">
      <style:paragraph-properties fo:line-height="115%" fo:margin-left="0cm" fo:margin-right="0cm" fo:text-indent="0cm" fo:margin-top="0pt" fo:margin-bottom="0pt" fo:border="none"/>
      <style:text-properties/>
    </style:style>
    <style:style style:family="text" style:name="T1349">
      <style:text-properties fo:color="#1f1f1f" fo:font-family="Arial" style:font-family-asian="Arial" style:font-family-complex="Arial" fo:font-size="12pt"/>
    </style:style>
    <style:style style:parent-style-name="141" style:family="paragraph" style:name="P887">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50">
      <style:text-properties fo:color="#1f1f1f" fo:font-family="Arial" style:font-family-asian="Arial" style:font-family-complex="Arial" fo:font-size="14pt" fo:font-weight="bold"/>
    </style:style>
    <style:style style:parent-style-name="668" style:list-style-name="WWNum49" style:family="paragraph" style:name="P888">
      <style:paragraph-properties fo:line-height="115%" fo:margin-right="0cm" fo:margin-top="0pt" fo:margin-bottom="0pt" fo:border="none"/>
      <style:text-properties/>
    </style:style>
    <style:style style:family="text" style:name="T1351">
      <style:text-properties fo:color="#1f1f1f" fo:font-family="Arial" style:font-family-asian="Arial" style:font-family-complex="Arial" fo:font-size="12pt"/>
    </style:style>
    <style:style style:parent-style-name="668" style:list-style-name="WWNum49" style:family="paragraph" style:name="P889">
      <style:paragraph-properties fo:line-height="115%" fo:margin-right="0cm" fo:margin-top="0pt" fo:margin-bottom="0pt" fo:border="none"/>
      <style:text-properties/>
    </style:style>
    <style:style style:family="text" style:name="T1352">
      <style:text-properties fo:color="#1f1f1f" fo:font-family="Arial" style:font-family-asian="Arial" style:font-family-complex="Arial" fo:font-size="12pt"/>
    </style:style>
    <style:style style:parent-style-name="668" style:list-style-name="WWNum49" style:family="paragraph" style:name="P890">
      <style:paragraph-properties fo:line-height="115%" fo:margin-right="0cm" fo:margin-top="0pt" fo:margin-bottom="0pt" fo:border="none"/>
      <style:text-properties/>
    </style:style>
    <style:style style:family="text" style:name="T1353">
      <style:text-properties fo:color="#1f1f1f" fo:font-family="Arial" style:font-family-asian="Arial" style:font-family-complex="Arial" fo:font-size="12pt"/>
    </style:style>
    <style:style style:parent-style-name="668" style:list-style-name="WWNum49" style:family="paragraph" style:name="P891">
      <style:paragraph-properties fo:line-height="115%" fo:margin-right="0cm" fo:margin-top="0pt" fo:margin-bottom="0pt" fo:border="none"/>
      <style:text-properties/>
    </style:style>
    <style:style style:family="text" style:name="T1354">
      <style:text-properties fo:color="#1f1f1f" fo:font-family="Arial" style:font-family-asian="Arial" style:font-family-complex="Arial" fo:font-size="12pt"/>
    </style:style>
    <style:style style:family="paragraph" style:name="P892">
      <style:paragraph-properties/>
      <style:text-properties/>
    </style:style>
    <style:style style:family="paragraph" style:name="P893">
      <style:paragraph-properties fo:line-height="115%" fo:margin-left="0cm" fo:margin-right="0cm" fo:text-indent="0cm" fo:margin-top="0pt" fo:margin-bottom="0pt" fo:break-before="page" fo:border="none"/>
      <style:text-properties/>
    </style:style>
    <style:style style:family="text" style:name="T1355">
      <style:text-properties fo:color="#1f1f1f" fo:font-family="Arial" style:font-family-asian="Arial" style:font-family-complex="Arial" fo:font-size="12pt"/>
    </style:style>
    <style:style style:parent-style-name="141" style:family="paragraph" style:name="P89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56">
      <style:text-properties fo:color="#1f1f1f" fo:font-family="Arial" style:font-family-asian="Arial" style:font-family-complex="Arial" fo:font-size="14pt" fo:font-weight="bold"/>
    </style:style>
    <style:style style:family="paragraph" style:name="P895">
      <style:paragraph-properties fo:line-height="115%" fo:margin-left="0cm" fo:margin-right="0cm" fo:text-indent="0cm" fo:margin-top="0pt" fo:margin-bottom="0pt" fo:border="none"/>
      <style:text-properties/>
    </style:style>
    <style:style style:family="text" style:name="T1357">
      <style:text-properties fo:color="#1f1f1f" fo:font-family="Arial" style:font-family-asian="Arial" style:font-family-complex="Arial" fo:font-size="12pt"/>
    </style:style>
    <style:style style:parent-style-name="142" style:family="paragraph" style:name="P896">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58">
      <style:text-properties fo:color="#1f1f1f" fo:font-family="Arial" style:font-family-asian="Arial" style:font-family-complex="Arial" fo:font-size="12pt" fo:font-weight="bold"/>
    </style:style>
    <style:style style:family="paragraph" style:name="P897">
      <style:paragraph-properties fo:line-height="115%" fo:margin-left="0cm" fo:margin-right="0cm" fo:text-indent="0cm" fo:margin-top="0pt" fo:margin-bottom="0pt" fo:border="none"/>
      <style:text-properties/>
    </style:style>
    <style:style style:family="text" style:name="T1359">
      <style:text-properties fo:color="#1f1f1f" fo:font-family="Arial" style:font-family-asian="Arial" style:font-family-complex="Arial" fo:font-size="12pt"/>
    </style:style>
    <style:style style:parent-style-name="142" style:family="paragraph" style:name="P898">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60">
      <style:text-properties fo:color="#1f1f1f" fo:font-family="Arial" style:font-family-asian="Arial" style:font-family-complex="Arial" fo:font-size="12pt" fo:font-weight="bold"/>
    </style:style>
    <style:style style:family="paragraph" style:name="P899">
      <style:paragraph-properties fo:line-height="115%" fo:margin-left="0cm" fo:margin-right="0cm" fo:text-indent="0cm" fo:margin-top="0pt" fo:margin-bottom="0pt" fo:border="none"/>
      <style:text-properties/>
    </style:style>
    <style:style style:family="text" style:name="T1361">
      <style:text-properties fo:color="#1f1f1f" fo:font-family="Arial" style:font-family-asian="Arial" style:font-family-complex="Arial" fo:font-size="12pt"/>
    </style:style>
    <style:style style:parent-style-name="142" style:family="paragraph" style:name="P900">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62">
      <style:text-properties fo:color="#1f1f1f" fo:font-family="Arial" style:font-family-asian="Arial" style:font-family-complex="Arial" fo:font-size="12pt" fo:font-weight="bold"/>
    </style:style>
    <style:style style:family="paragraph" style:name="P901">
      <style:paragraph-properties fo:line-height="115%" fo:margin-left="0cm" fo:margin-right="0cm" fo:text-indent="0cm" fo:margin-top="0pt" fo:margin-bottom="0pt" fo:border="none"/>
      <style:text-properties/>
    </style:style>
    <style:style style:family="text" style:name="T1363">
      <style:text-properties fo:color="#1f1f1f" fo:font-family="Arial" style:font-family-asian="Arial" style:font-family-complex="Arial" fo:font-size="12pt"/>
    </style:style>
    <style:style style:parent-style-name="142" style:family="paragraph" style:name="P902">
      <style:paragraph-properties fo:line-height="115%" fo:margin-left="0cm" fo:margin-right="0cm" fo:text-indent="0cm" fo:margin-top="0pt" fo:border="none"/>
      <style:text-properties fo:color="#0f4761" fo:font-family="Arial" style:font-family-asian="Arial" style:font-family-complex="Arial" fo:font-style="italic"/>
    </style:style>
    <style:style style:family="text" style:name="T1364">
      <style:text-properties fo:color="#1f1f1f" fo:font-family="Arial" style:font-family-asian="Arial" style:font-family-complex="Arial" fo:font-size="12pt" fo:font-weight="bold"/>
    </style:style>
    <style:style style:family="paragraph" style:name="P903">
      <style:paragraph-properties fo:line-height="115%" fo:margin-left="0cm" fo:margin-right="0cm" fo:text-indent="0cm" fo:margin-top="0pt" fo:margin-bottom="0pt" fo:border="none"/>
      <style:text-properties/>
    </style:style>
    <style:style style:family="text" style:name="T1365">
      <style:text-properties fo:color="#1f1f1f" fo:font-family="Arial" style:font-family-asian="Arial" style:font-family-complex="Arial" fo:font-size="12pt"/>
    </style:style>
    <style:style style:parent-style-name="141" style:family="paragraph" style:name="P904">
      <style:paragraph-properties fo:line-height="115%" fo:margin-left="0cm" fo:margin-right="0cm" fo:text-indent="0cm" fo:margin-top="0pt" fo:border="none"/>
      <style:text-properties fo:color="#0f4761" fo:font-family="Arial" style:font-family-asian="Arial" style:font-family-complex="Arial" fo:font-size="14pt" style:font-size-complex="14pt"/>
    </style:style>
    <style:style style:family="text" style:name="T1366">
      <style:text-properties fo:color="#1f1f1f" fo:font-family="Arial" style:font-family-asian="Arial" style:font-family-complex="Arial" fo:font-size="14pt" fo:font-weight="bold"/>
    </style:style>
    <style:style style:parent-style-name="668" style:list-style-name="WWNum50" style:family="paragraph" style:name="P905">
      <style:paragraph-properties fo:line-height="115%" fo:margin-right="0cm" fo:margin-top="0pt" fo:margin-bottom="0pt" fo:border="none"/>
      <style:text-properties/>
    </style:style>
    <style:style style:family="text" style:name="T1367">
      <style:text-properties fo:color="#1f1f1f" fo:font-family="Arial" style:font-family-asian="Arial" style:font-family-complex="Arial" fo:font-size="12pt"/>
    </style:style>
    <style:style style:parent-style-name="668" style:list-style-name="WWNum50" style:family="paragraph" style:name="P906">
      <style:paragraph-properties fo:line-height="115%" fo:margin-right="0cm" fo:margin-top="0pt" fo:margin-bottom="0pt" fo:border="none"/>
      <style:text-properties/>
    </style:style>
    <style:style style:family="text" style:name="T1368">
      <style:text-properties fo:color="#1f1f1f" fo:font-family="Arial" style:font-family-asian="Arial" style:font-family-complex="Arial" fo:font-size="12pt"/>
    </style:style>
    <style:style style:parent-style-name="668" style:list-style-name="WWNum50" style:family="paragraph" style:name="P907">
      <style:paragraph-properties fo:line-height="115%" fo:margin-right="0cm" fo:margin-top="0pt" fo:margin-bottom="0pt" fo:border="none"/>
      <style:text-properties/>
    </style:style>
    <style:style style:family="text" style:name="T1369">
      <style:text-properties fo:color="#1f1f1f" fo:font-family="Arial" style:font-family-asian="Arial" style:font-family-complex="Arial" fo:font-size="12pt"/>
    </style:style>
    <style:style style:parent-style-name="668" style:list-style-name="WWNum50" style:family="paragraph" style:name="P908">
      <style:paragraph-properties fo:line-height="115%" fo:margin-right="0cm" fo:margin-top="0pt" fo:margin-bottom="0pt" fo:border="none"/>
      <style:text-properties/>
    </style:style>
    <style:style style:family="text" style:name="T1370">
      <style:text-properties fo:color="#1f1f1f" fo:font-family="Arial" style:font-family-asian="Arial" style:font-family-complex="Arial" fo:font-size="12pt"/>
    </style:style>
    <style:style style:family="paragraph" style:name="P909">
      <style:paragraph-properties/>
      <style:text-properties/>
    </style:style>
  </office:automatic-styles>
  <office:body>
    <office:text text:use-soft-page-breaks="true">
      <text:p text:style-name="P33"><text:span text:style-name="T482">[🟢 Online Mode | 26.06.05_15:41:34]</text:span><text:span/></text:p>
      <text:p text:style-name="P34"><text:span text:style-name="T483">107. 모태 진입의 세 가지 기적적인 조건</text:span><text:span/></text:p>
      <text:p text:style-name="P35"><text:span text:style-name="T484">🔑 핵심 키워드: 입태경, 바르도 유정, 삼종화합, 태생의 조건</text:span><text:span/></text:p>
      <text:p text:style-name="P36"><text:span text:style-name="T485">🏥 첫 번째 단추, 건강하고 준비된 모태</text:span><text:span/></text:p>
      <text:p text:style-name="P37"><text:span text:style-name="T486">새로운 생명이 안정적으로 싹트기 위해서는 먼저 씨앗이 뿌려질 바탕이 완벽하게 준비되어 있어야 해. 입태경의 가르침에 따르면 어머니의 몸에 아무런 질병이 없어야 하고, 생물학적으로 아이를 가질 수 있는 자궁의 타이밍이 딱 맞아야 하지. 이는 아무리 좋은 씨앗이 손에 쥐어져 있어도 메마르고 척박한 겨울 땅에는 결코 새싹을 틔울 수 없는 것과 같아. 기름진 토양이 준비되어야 비로소 생명의 역사가 시작되는 첫 단추가 끼워지는 셈이야.</text:span><text:span/></text:p>
      <text:p text:style-name="P38"><text:span text:style-name="T487">🧭 두 번째 단추, 다가오는 의식의 갈망</text:span><text:span/></text:p>
      <text:p text:style-name="P39"><text:span text:style-name="T488">바르도 상태를 떠돌던 미세한 의식인 바르도 유정이 그 태어날 주위에 부지런히 가까이 다가와 자궁에 들기를 간절히 원해야 해. 밀교에서는 이 존재를 향기를 맡고 찾아다니는 존재라는 뜻으로 부르기도 하는데, 다음 생을 향한 강력한 인연과 갈망을 지니고 있지. 아무리 아늑하고 멋진 집이 지어져 있어도 그곳에 들어가 살고 싶어 하는 주인이 문 앞에 도착하지 않는다면 그 집은 영원히 빈집으로 남을 수밖에 없는 이치와 같아.</text:span><text:span/></text:p>
      <text:p text:style-name="P40"><text:span text:style-name="T489">⚡ 세 번째 단추, 두 인연의 강력한 만남</text:span><text:span/></text:p>
      <text:p text:style-name="P41"><text:span text:style-name="T490">마지막으로 남성과 여성, 즉 부모가 될 두 존재가 서로를 깊이 갈망하며 결합하는 물리적인 만남이 정확한 순간에 이루어져야 해. 앞선 두 조건이 아무리 완벽해도 이 최종적인 인연의 결합이 없다면 의식이 물질적인 몸을 입을 기회가 주어지지 않거든. 이는 마치 발전소에 모든 송전 설비가 갖춰지고 전기를 기다리는 소비자가 있어도, 중간 전선이 연결되어 스위치가 켜지지 않으면 불이 들어오지 않는 것과 같은 원리야.</text:span><text:span/></text:p>
      <text:p text:style-name="P42"><text:span text:style-name="T491">🎯 세 가지 기운이 만들어내는 생명의 탄생</text:span><text:span/></text:p>
      <text:p text:style-name="P43"><text:span text:style-name="T492">결국 모태에 생명이 깃드는 것은 이 세 가지 조건이 단 하나도 빠짐없이 동시에 완벽하게 맞아떨어질 때만 가능한 기적이야. 이 중 어느 하나라도 어긋나거나 삼종화합을 방해하는 요인이 있다면 다음 생으로의 대전환은 일어나지 않아. 우리 모두는 이 까다롭고 정밀한 우주적 타이밍을 뚫고 태어난 고귀한 존재들이며, 이 몸을 얻은 것 자체가 성불을 향해 나아갈 수 있는 최고의 기회를 잡은 것이지.</text:span><text:span/></text:p>
      <text:p text:style-name="P44"><text:span text:style-name="T493">📝 핵심 요약</text:span><text:span/></text:p>
      <text:list text:style-name="WWNum1" text:continue-numbering="true">
        <text:list-item>
          <text:p text:style-name="P45"><text:span text:style-name="T494">새로운 생명이 잉태되려면 세 가지 알맞은 조건이 합치되고 거슬리는 조건이 없어야 한다.</text:span><text:span/></text:p>
        </text:list-item>
        <text:list-item>
          <text:p text:style-name="P46"><text:span text:style-name="T495">어머니의 신체가 질병 없이 건강하고 생물학적 시기가 맞아야 하는 바탕이 필요하다.</text:span><text:span/></text:p>
        </text:list-item>
        <text:list-item>
          <text:p text:style-name="P47"><text:span text:style-name="T496">다음 생을 갈구하는 바르도 유정이 근처에 존재하며 모태에 들려는 의지가 있어야 한다.</text:span><text:span/></text:p>
        </text:list-item>
        <text:list-item>
          <text:p text:style-name="P48"><text:span text:style-name="T497">부모가 될 두 남녀의 상호 갈망과 육체적 결합이 동시에 완전하게 결합되어야 성립한다.</text:span><text:span/></text:p>
        </text:list-item>
      </text:list>
      <text:p text:style-name="P49"><text:span><text:soft-page-break/></text:span><text:span/><text:span/></text:p>
      <text:p text:style-name="P50"><text:span text:style-name="T498">[🟢 Online Mode | 26.06.05_15:41:41]</text:span><text:span/></text:p>
      <text:p text:style-name="P51"><text:span text:style-name="T499">108. 새로운 생명으로 태어나기 위한 세 가지 완벽한 조건</text:span><text:span/></text:p>
      <text:p text:style-name="P52"><text:span text:style-name="T500">🔑 핵심 키워드: 자궁의 결함, 정혈의 결함, 업의 결함, 세 가지 거슬리는 조건</text:span><text:span/></text:p>
      <text:p text:style-name="P53"><text:span text:style-name="T501">🏡 아늑하고 온전한 첫 번째 집, 자궁의 조건</text:span><text:span/></text:p>
      <text:p text:style-name="P54"><text:span text:style-name="T502">새로운 몸을 받아 태어나려면 가장 먼저 의식이 머무를 어머니의 자궁이 아무런 기형이나 질병 없이 건강해야 해. 자궁의 모양이 보리알처럼 중간이 갈라졌거나, 개미 허리처럼 지나치게 가늘거나, 낙타 입처럼 뒤틀려 있으면 안 되고, 몸 안의 미세한 기운이나 담즙 같은 분비물로 막혀 있어서도 안 되지. 이것은 마치 새로운 입주자를 맞이하기 전에 집안의 보일러가 고장 나지는 않았는지, 벽면에 물이 새거나 구조적인 균열이 없는지 꼼꼼하게 확인하고 완벽하게 수리해 두</text:span><text:span text:style-name="T503">어야 하는 것과 아주 똑같아.</text:span><text:span/></text:p>
      <text:p text:style-name="P55"><text:span text:style-name="T504">🌱 생명의 싹을 틔우는 깨끗한 씨앗의 만남</text:span><text:span/></text:p>
      <text:p text:style-name="P56"><text:span text:style-name="T505">태어남이 이루어지려면 부모의 정서적인 결합뿐만 아니라 물리적인 씨앗인 아버지의 정수와 어머니의 혈액이 아주 건강하고 청정한 상태로 만나야 해. 어느 한쪽이 제대로 나오지 않거나, 나오더라도 타이밍이 맞지 않아 엇갈리거나, 동시는 나왔지만 어느 한쪽이 본래의 생명력을 잃고 부패해 있다면 생명이 잉태될 수 없지. 최고급 화분에 기름진 흙을 채워두었어도, 심으려는 씨앗 자체가 말라비틀어졌거나 썩어 있다면 아무리 물을 주고 정성을 쏟아도 결코 파란 싹을 틔울 수</text:span><text:span text:style-name="T506"> 없는 것과 같은 이치야.</text:span><text:span/></text:p>
      <text:p text:style-name="P57"><text:span text:style-name="T507">🔌 부모와 자식을 연결하는 보이지 않는 인연의 주파수</text:span><text:span/></text:p>
      <text:p text:style-name="P58"><text:span text:style-name="T508">신체적인 조건이 아무리 완벽해도 바르도 상태를 떠도는 의식인 심향과 부모 사이에 전생부터 이어져 온 깊은 업의 끈이 없다면 부모와 자식의 인연으로 묶일 수 없어. 바르도 존재가 그 부모의 자식으로 태어날 업을 짓지 못했거나, 반대로 그 부모가 될 남녀가 해당 존재를 자식으로 맞이할 인연을 쌓지 않았다면 결합은 일어나지 않지. 라디오를 들을 때 방송국에서 보내는 송신 주파수와 내 라디오 기기의 수신 주파수가 단 0.1헤르츠의 오차도 없이 정확하게 맞아떨어져</text:span><text:span text:style-name="T509">야만 비로소 맑은 노래가 흘러나오는 것과 같은 신비로운 연결망이야.</text:span><text:span/></text:p>
      <text:p text:style-name="P59"><text:span text:style-name="T510">⚙️ 모든 톱니바퀴가 완벽하게 맞물리는 탄생의 기적</text:span><text:span/></text:p>
      <text:p text:style-name="P60"><text:span text:style-name="T511">결국 하나의 완전한 인간으로 세상에 첫발을 내딛기 위해서는 이 자궁, 씨앗, 그리고 업이라는 세 가지 영역에서 단 하나의 결함도 없어야만 해. 이 조건들 중 어느 하나라도 어긋나거나 거슬리는 상황이 생기면 태어남의 통로는 단호하게 닫혀버리게 되지. 거대한 우주선이 대기권을 뚫고 하늘로 날아오르기 위해서 선체의 기계적 결함이 없어야 하고, 연료의 배합이 완벽해야 하며, 발사 당일의 기상 조건까지 삼박자가 모두 완벽하게 들어맞아야 하는 거대한 우주적 기적과도</text:span><text:span text:style-name="T512"> 같은 과정이라고 볼 수 있어.</text:span><text:span/></text:p>
      <text:p text:style-name="P61"><text:span text:style-name="T513">📝 핵심 요약</text:span><text:span/></text:p>
      <text:list text:style-name="WWNum2" text:continue-numbering="true">
        <text:list-item>
          <text:p text:style-name="P62"><text:span text:style-name="T514">새로운 생명으로 잉태되기 위해서는 자궁과 정혈, 그리고 인과의 업이라는 세 가지 결함이 없어야 함.</text:span><text:span/></text:p>
        </text:list-item>
        <text:list-item>
          <text:p text:style-name="P63"><text:span text:style-name="T515">자궁은 구조적인 기형이 없어야 하며 신체 내부의 거친 분비물로 막히지 않은 건강한 상태여야 함.</text:span><text:span/></text:p>
        </text:list-item>
        <text:list-item>
          <text:p text:style-name="P64"><text:span text:style-name="T516">부모의 정과 혈은 건강해야 하고 방출되는 타이밍과 신선도가 완벽하게 맞아떨어져야 함.</text:span><text:span/></text:p>
        </text:list-item>
        <text:list-item>
          <text:p text:style-name="P65"><text:span text:style-name="T517">물질적 조건 외에도 바르도 존재와 부모 사이에 자식과 부모가 될 전생의 업이 반드시 존재해야 함.</text:span><text:span/></text:p>
        </text:list-item>
      </text:list>
      <text:p text:style-name="P66"><text:span><text:soft-page-break/></text:span><text:span/><text:span/></text:p>
      <text:p text:style-name="P67"><text:span text:style-name="T518">[🟢 Online Mode | 26.06.05_15:42:31]</text:span><text:span/></text:p>
      <text:p text:style-name="P68"><text:span text:style-name="T519">109. 비나야경의 여섯 조건과 생유의 비밀</text:span><text:span/></text:p>
      <text:p text:style-name="P69"><text:span text:style-name="T520">🔑 핵심 키워드: 비나야경, 여섯 가지 인연, 생유, 의식의 탄생</text:span><text:span/></text:p>
      <text:p text:style-name="P70"><text:span text:style-name="T521">👶 새롭게 생명으로 태어나는 단계인 생유에 접어들 때, 밀교의 깊은 가르침과 소승 불교의 규범을 담은 비나야경의 설명은 결국 놀라울 정도로 한곳에서 만나게 돼. 비나야경에서는 새로운 몸을 받고 태어나기 위해 반드시 여섯 가지 인연이 눈앞에 완전히 갖추어져야 한다고 가르치거든. 이것은 마치 우리가 스마트폰에 새로 로그인할 때 여섯 자리의 보안 인증 번호가 한 치의 오차도 없이 완벽하게 일치해야만 마침내 비밀의 문이 열리는 것과 같은 이치야.</text:span><text:span/></text:p>
      <text:p text:style-name="P71"><text:span text:style-name="T522">🧪 이 여섯 가지 인연이란 부모의 만남과 모태의 건강한 환경, 그리고 새로운 생명으로 태어나려는 바르도 존재의 미세한 의식과 업력 등이 완벽하게 타이밍을 맞추는 것을 의미해. 아무리 태어나고 싶은 의지가 강해도 물질적인 조건이나 부모와의 인연이라는 퍼즐 조각이 하나라도 부족하면 다음 생의 몸을 입을 수 없지. 맛있는 빵을 구울 때 밀가루와 이스트, 설탕 등 필수적인 여섯 가지 재료가 정량대로 모두 모여야만 비로소 제대로 된 빵이 부풀어 오르는 것과 똑같은</text:span><text:span text:style-name="T523"> 물리적이고 영적인 결합 과정인 셈이야.</text:span><text:span/></text:p>
      <text:p text:style-name="P72"><text:span text:style-name="T524">🔬 재미있는 점은 겉보기에 엄격한 계율과 도덕을 강조하는 비나야경의 가르침이, 인간의 미세한 에너지 흐름을 다루는 밀교의 고차원적인 원리와 본질적으로 완전히 일치한다는 사실이야. 표현하는 단어나 강조하는 방식은 조금 다를지라도, 영혼이 새로운 육체를 선택하고 결합하는 그 신비로운 순간의 메커니즘을 똑같이 관통하고 있어. 동양 의학과 서양 의학이 환자의 몸을 고치는 접근법은 달라도 결국 인간의 장기와 혈액 순환이라는 동일한 진리를 설명하는 것과 같은 맥락이</text:span><text:span text:style-name="T525">지.</text:span><text:span/></text:p>
      <text:p text:style-name="P73"><text:span text:style-name="T526">🧘 결국 이 여섯 가지 조건이 모두 갖추어져 생유의 단계로 들어선다는 것은, 우리가 과거에 지은 업의 결과가 얼마나 정교하고 빈틈없이 작동하는지를 보여주는 증거야. 이 비밀을 미리 알고 있는 수행자는 자신이 어떤 인연을 만나더라도 당황하지 않고, 그 조건을 스스로 제어하며 더 청정한 몸을 선택해 태어날 수 있는 영적 주도권을 쥐게 돼. 거센 파도에 휩쓸리는 조각배가 되는 대신, 바람과 돛의 방향을 완벽하게 이해하고 다루는 노련한 선장처럼 다음 생의 문을 </text:span><text:span text:style-name="T527">스스로 열고 나아가는 위대한 지혜를 얻게 되는 거지.</text:span><text:span/></text:p>
      <text:p text:style-name="P74"><text:span text:style-name="T528">📝 핵심 요약</text:span><text:span/></text:p>
      <text:list text:style-name="WWNum3" text:continue-numbering="true">
        <text:list-item>
          <text:p text:style-name="P75"><text:span text:style-name="T529">비나야경에서 설하는 여섯 가지 인연은 새로운 생명으로 태어나는 생유의 필수 조건임</text:span><text:span/></text:p>
        </text:list-item>
        <text:list-item>
          <text:p text:style-name="P76"><text:span text:style-name="T530">부모의 인연, 모태의 환경, 바르도 존재의 의식 등 물질적이고 미세한 에너지들이 모두 결합해야 함</text:span><text:span/></text:p>
        </text:list-item>
        <text:list-item>
          <text:p text:style-name="P77"><text:span text:style-name="T531">계율을 다루는 비나야경과 미세 에너지를 다루는 밀교의 가르침은 본질적으로 완전히 일치함</text:span><text:span/></text:p>
        </text:list-item>
        <text:list-item>
          <text:p text:style-name="P78"><text:span text:style-name="T532">탄생의 정교한 조건을 이해함으로써 수행자는 다음 생을 스스로 선택하고 제어할 수 있는 지혜를 얻음</text:span><text:span/></text:p>
        </text:list-item>
      </text:list>
      <text:p text:style-name="P79"><text:span><text:soft-page-break/></text:span><text:span/><text:span/></text:p>
      <text:p text:style-name="P80"><text:span text:style-name="T533">110. 자궁으로의 진입과 새로운 몸을 결정하는 욕망</text:span><text:span/></text:p>
      <text:p text:style-name="P81"><text:span text:style-name="T534">🔑 핵심 키워드: 바르도 유정, 자궁 진입 조건, 환상, 남녀의 생과 욕망, 집착의 방향</text:span><text:span/></text:p>
      <text:p text:style-name="P82"><text:span text:style-name="T535">🚪 새로운 생명으로 들어가는 비밀번호</text:span><text:span/></text:p>
      <text:p text:style-name="P83"><text:span text:style-name="T536">바르도의 존재가 다시 인간의 세상에 태어나기 위해서는 마치 정밀한 은행 금고를 열 때 여러 개의 비밀번호가 동시에 맞아떨어져야 하는 것과 같아. 자궁에 들어가기 위해 필요한 세 가지 알맞은 조건이 완벽하게 갖추어지고, 이를 방해하는 세 가지 거슬리는 조건들이 깨끗하게 사라진 완벽한 타이밍이 와야 하지. 이 기막힌 조건들이 충족될 때, 비로소 바르도 유정은 다음 생을 향한 구체적인 문을 열고 진입하게 되는 거야.</text:span><text:span/></text:p>
      <text:p text:style-name="P84"><text:span text:style-name="T537">🎬 환상처럼 눈앞에 펼쳐지는 무대</text:span><text:span/></text:p>
      <text:p text:style-name="P85"><text:span text:style-name="T538">조건이 모두 갖춰지면 바르도 유정의 눈앞에는 미래의 부모가 서로 교합하는 모습이 마치 가상현실 기기를 쓰고 생생한 영화를 보는 것처럼 환상 속의 한 장면으로 펼쳐지게 돼. 이때 유정은 단순한 구경꾼으로 남는 것이 아니라, 자신도 그 결합의 순간에 직접 참여하여 성교하고자 하는 강렬한 본능적 욕정에 깊이 사로잡히게 된단다. 이 눈먼 욕망이 윤회의 끈을 다시 이어붙이는 강력한 접착제 역할을 하는 셈이지.</text:span><text:span/></text:p>
      <text:p text:style-name="P86"><text:span text:style-name="T539">👦 아들로 태어날 때 일어나는 마음의 비대칭</text:span><text:span/></text:p>
      <text:p text:style-name="P87"><text:span text:style-name="T540">만약 이 존재가 다음 생에 남자의 몸, 즉 아들로 태어날 업을 지니고 있다면 마음의 화살표가 묘하게 비틀려 가기 시작해. 어머니를 향해서는 눈을 뗄 수 없을 만큼 강렬한 애착과 사랑을 느끼며 다가가고 싶어 하지만, 반대로 아버지를 향해서는 강한 질투심과 거부감을 느끼며 눈앞에서 저 멀리 떠나주기를 간절히 바라게 되지. 자석의 같은 극끼리 서로 밀어내고 다른 극끼리 강하게 끌어당기는 성질과 아주 비슷해.</text:span><text:span/></text:p>
      <text:p text:style-name="P88"><text:span text:style-name="T541">👧 딸로 태어날 때 작동하는 반대의 인력</text:span><text:span/></text:p>
      <text:p text:style-name="P89"><text:span text:style-name="T542">반대로 다음 생에 여자의 몸, 즉 딸로 태어날 존재라면 이 욕망의 방향성이 정확히 반대로 뒤집혀서 작동하게 돼. 이번에는 아버지를 향해 깊은 애모의 감정을 품으며 자석처럼 이끌리게 되고, 오히려 어머니를 나를 방해하는 경쟁자로 인식하며 멀리 사라져 주기를 바라는 마음이 일어나지. 이처럼 순간적인 애착과 증오라는 미세한 마음의 이끌림이 결국 어머니의 자궁이라는 새로운 감옥에 갇혀 육체를 입게 만드는 결정적인 계기가 되는 거야.</text:span><text:span/></text:p>
      <text:p text:style-name="P90"><text:span text:style-name="T543">📝 핵심 요약</text:span><text:span/></text:p>
      <text:list text:style-name="WWNum4" text:continue-numbering="true">
        <text:list-item>
          <text:p text:style-name="P91"><text:span text:style-name="T544">새로운 환생을 위해서는 자궁에 들어갈 3가지 긍정적 조건과 거슬림이 없는 상태가 결합해야 한다.</text:span><text:span/></text:p>
        </text:list-item>
        <text:list-item>
          <text:p text:style-name="P92"><text:span text:style-name="T545">바르도 유정은 부모의 교합을 환상처럼 보며 본능적인 성적 욕정에 강하게 이끌린다.</text:span><text:span/></text:p>
        </text:list-item>
        <text:list-item>
          <text:p text:style-name="P93"><text:span text:style-name="T546">아들로 태어날 존재는 어머니에게 애착을 느끼고 아버지가 떠나기를 바란다.</text:span><text:span/></text:p>
        </text:list-item>
        <text:list-item>
          <text:p text:style-name="P94"><text:span text:style-name="T547">딸로 태어날 존재는 아버지를 애모하고 어머니가 멀어지기를 바라는 정반대의 욕망이 일어난다.</text:span><text:span/></text:p>
        </text:list-item>
      </text:list>
      <text:p text:style-name="P95"><text:span><text:soft-page-break/></text:span><text:span/><text:span/></text:p>
      <text:p text:style-name="P96"><text:span text:style-name="T548">[🟢 Online Mode | 26.06.05_15:43:50]</text:span><text:span/></text:p>
      <text:p text:style-name="P97"><text:span text:style-name="T549">111. 애착과 분노가 이끄는 환생의 마지막 관문</text:span><text:span/></text:p>
      <text:p text:style-name="P98"><text:span text:style-name="T550">🔑 핵심 키워드: 애착의 포옹, 업력의 시야 제한, 분노의 발생, 자궁 진입</text:span><text:span/></text:p>
      <text:p text:style-name="P99"><text:span text:style-name="T551">🧲 강렬한 자석처럼 이끌리는 애착의 순간</text:span><text:span/></text:p>
      <text:p text:style-name="P100"><text:span text:style-name="T552">바르도 존재가 다음 생을 받을 인연을 만나면 내면에서 제어하기 힘든 강한 애착의 감정이 피어올라. 미래의 부모가 될 존재들을 보며 그 관계 속으로 깊이 들어가 안기고 싶어 하는 본능적인 이끌림이 발생하지. 이것은 사방으로 흩어져 있던 철가루가 강력한 자석 주위로 다가가다가 어느 순간 제어력을 완전히 잃고 순식간에 자석 표면으로 척 붙어버리는 강력한 인력의 법칙과 아주 비슷해.</text:span><text:span/></text:p>
      <text:p text:style-name="P101"><text:span text:style-name="T553">👓 업력이 만들어낸 극단적인 터널 시야</text:span><text:span/></text:p>
      <text:p text:style-name="P102"><text:span text:style-name="T554">이때 과거에 지은 업의 강력한 힘이 개입하면서 존재의 시야를 아주 좁고 왜곡되게 제한해버려. 상대방의 온전한 모습이나 아름다운 인품은 전혀 보이지 않고 오직 남녀의 성적 징후인 특정한 신체 부위만 눈앞에 거대하게 클로즈업되어 나타나지. 스마트폰 카메라를 켤 때 주변 배경은 모두 흐릿하게 날아가고 오직 중심의 한 점에만 초점이 과도하게 잡히는 아웃포커싱 현상이나, 가상현실 기기의 렌즈가 오염되어 시야각이 극단적으로 좁아진 상태를 상상하면 쉬워.</text:span><text:span/></text:p>
      <text:p text:style-name="P103"><text:span text:style-name="T555">⚡ 집착과 거부감이 부딪히는 마음의 쇼트 현상</text:span><text:span/></text:p>
      <text:p text:style-name="P104"><text:span text:style-name="T556">자신이 애착을 느끼는 대상에게 다가가려 하지만, 눈앞에 가로막힌 성적인 징후와 장벽을 마주하는 순간 마음속에서는 격렬한 분노와 거부감이 동시에 폭발하게 돼. 한쪽에는 강하게 움켜쥐려는 욕망이 있고, 다른 한쪽에는 그것을 가로막는 상황에 대한 강한 증오가 자리 잡으면서 감정이 팽팽하게 대립하는 거지. 플러스 전극과 마이너스 전극이 중간 차단기 없이 갑자기 맞부딪힐 때 강력한 불꽃을 일으키며 시스템이 일시에 타버리는 쇼트 현상처럼 말이야.</text:span><text:span/></text:p>
      <text:p text:style-name="P105"><text:span text:style-name="T557">🚪 바르도 몸의 소멸과 새로운 태내 진입</text:span><text:span/></text:p>
      <text:p text:style-name="P106"><text:span text:style-name="T558">결국 이 강렬한 애착과 분노라는 두 가지 모순된 감정의 충돌이 바르도 존재에게는 치명적인 저항력으로 작용하여 그동안 유지하던 미세한 의생신을 마감하게 만들어. 이 감정의 폭발이 곧 바르도 세계에서의 죽음을 유발하는 근본 원인이 되고, 존재는 그 에너지가 이끄는 대로 어머니의 자궁이라는 새로운 세계의 문을 열고 들어가게 되지. 기존에 살던 집의 계약이 끝나자마자 거대한 소용돌이에 휩쓸려 새로운 거주지로 순식간에 이사하게 되는 자연스러운 생명의 순환 과정이야</text:span><text:span text:style-name="T559">.</text:span><text:span/></text:p>
      <text:p text:style-name="P107"><text:span text:style-name="T560">📝 핵심 요약</text:span><text:span/></text:p>
      <text:list text:style-name="WWNum5" text:continue-numbering="true">
        <text:list-item>
          <text:p text:style-name="P108"><text:span text:style-name="T561">바르도 존재는 다음 생의 인연을 마주할 때 제어할 수 없는 강한 애착을 느끼며 접근함.</text:span><text:span/></text:p>
        </text:list-item>
        <text:list-item>
          <text:p text:style-name="P109"><text:span text:style-name="T562">업력의 영향으로 온전한 형태는 보이지 않고 오직 성적인 징후만 보이는 시야 제한이 일어남.</text:span><text:span/></text:p>
        </text:list-item>
        <text:list-item>
          <text:p text:style-name="P110"><text:span text:style-name="T563">원하는 대상을 포옹하려는 순간 욕망과 분노가 격렬하게 부딪히며 감정의 쇼트가 발생함.</text:span><text:span/></text:p>
        </text:list-item>
        <text:list-item>
          <text:p text:style-name="P111"><text:span text:style-name="T564">이 두 감정이 바르도 몸의 소멸을 부르는 원인이 되어 어머니의 자궁 속으로 진입하게 됨.</text:span><text:span/></text:p>
        </text:list-item>
      </text:list>
      <text:p text:style-name="P112"><text:span><text:soft-page-break/></text:span><text:span/><text:span/></text:p>
      <text:p text:style-name="P113"><text:span text:style-name="T565">[🟢 Online Mode | 26.06.05_15:44:00]</text:span><text:span/></text:p>
      <text:p text:style-name="P114"><text:span text:style-name="T566">112. 바르도 유정의 착각과 인연의 시작</text:span><text:span/></text:p>
      <text:p text:style-name="P115"><text:span text:style-name="T567">🔑 핵심 키워드: 유가사지론, 구사론석, 바르도 유정, 착란, 교합, 인연</text:span><text:span/></text:p>
      <text:p text:style-name="P116"><text:span text:style-name="T568">👁️ 유령이 보게 되는 가상의 신기루</text:span><text:span/></text:p>
      <text:p text:style-name="P117"><text:span text:style-name="T569">바르도 유정이 부모가 될 존재들을 바라볼 때 일어나는 신비로운 현상에 대한 이야기야. 렌즈에 왜곡 필터가 끼어 있으면 평범한 풍경도 완전히 다르게 보이는 것처럼, 바르도 존재는 마음속의 강한 업의 이끌림 때문에 눈앞의 상황을 있는 그대로 보지 못하고 거대한 착각의 안개 속으로 걸어 들어가게 돼.</text:span><text:span/></text:p>
      <text:p text:style-name="P118"><text:span text:style-name="T570">🛌 단순히 누워 있는 부모와 마음의 착란</text:span><text:span/></text:p>
      <text:p text:style-name="P119"><text:span text:style-name="T571">유가사지론이라는 깊은 가르침에서는 이에 대해 매우 재미있는 설명을 해. 실제로는 미래의 부모가 될 남녀가 그저 나란히 누워 있을 뿐인데도, 바르도 존재는 그 모습을 보고 정혈, 즉 생명의 기운에 마음이 확 빼앗겨서 서로 사랑을 나누며 교합하는 장면으로 착각을 일으킨다는 거야. 마치 멀리서 흔들리는 플라스틱 비닐봉지를 보고 진짜 살아있는 고양이로 착각해서 가슴이 두근거리는 것과 같은 강렬한 마음의 왜곡 현상이지.</text:span><text:span/></text:p>
      <text:p text:style-name="P120"><text:span text:style-name="T572">🔗 두 논서가 일치하는 강력한 이끌림</text:span><text:span/></text:p>
      <text:p text:style-name="P121"><text:span text:style-name="T573">이 오묘한 현상에 대해서는 구사론석이라는 또 다른 위대한 논서에서도 똑같이 동의하고 있어. 두 가르침 모두 바르도 존재가 마주하는 그 장면이 아주 강렬한 교합의 한 장면으로 인식된다고 입을 모으지. 이는 우연이 아니라 그 영혼이 다음 생의 육체를 입고 이 세상에 태어나기 위해 반드시 거쳐야만 하는, 거부할 수 없는 자석 같은 인연의 인력 장치가 가동되는 순간이기 때문이야.</text:span><text:span/></text:p>
      <text:p text:style-name="P122"><text:span text:style-name="T574">🚪 생명의 문을 여는 거대한 착각의 덫</text:span><text:span/></text:p>
      <text:p text:style-name="P123"><text:span text:style-name="T575">결국 이 착란과 오해는 영혼이 새로운 삶을 시작하게 만드는 자연의 정교한 덫이자 도구라고 볼 수 있어. 아무런 감정의 동요가 없다면 무거운 육체의 몸을 다시 입으려 하지 않을 테니까, 마음 스스로가 만들어낸 거대한 환영을 통해 생명의 문을 열고 들어가는 셈이지. 마치 꿈속에서 너무나 생생한 음식을 보고 입에 침이 고여 잠에서 깨어나는 것처럼, 이 착각을 시작으로 영혼은 새로운 인간으로서의 위대한 여정을 다시 시작하게 된단다.</text:span><text:span/></text:p>
      <text:p text:style-name="P124"><text:span text:style-name="T576">📝 핵심 요약</text:span><text:span/></text:p>
      <text:list text:style-name="WWNum6" text:continue-numbering="true">
        <text:list-item>
          <text:p text:style-name="P125"><text:span text:style-name="T577">바르도 유정은 미래의 부모를 마주할 때 강력한 마음의 왜곡과 착란을 경험한다.</text:span><text:span/></text:p>
        </text:list-item>
        <text:list-item>
          <text:p text:style-name="P126"><text:span text:style-name="T578">유가사지론에 따르면 부모가 단지 누워 있는 상태임에도 교합하는 모습으로 착각한다.</text:span><text:span/></text:p>
        </text:list-item>
        <text:list-item>
          <text:p text:style-name="P127"><text:span text:style-name="T579">구사론석 역시 바르도 존재가 그 장면을 교합으로 인식한다는 점에 의견을 같이한다.</text:span><text:span/></text:p>
        </text:list-item>
        <text:list-item>
          <text:p text:style-name="P128"><text:span text:style-name="T580">이러한 강렬한 환영과 착각은 영혼이 다음 생의 육신과 인연을 맺고 태어나게 만드는 계기가 된다.</text:span><text:span/></text:p>
        </text:list-item>
      </text:list>
      <text:p text:style-name="P129"><text:span><text:soft-page-break/></text:span><text:span/><text:span/></text:p>
      <text:p text:style-name="P130"><text:span text:style-name="T581">[🔴 Offline Mode | 26.06.05_15:45:00]</text:span><text:span/></text:p>
      <text:p text:style-name="P131"><text:span text:style-name="T582">113. 에너지의 융합과 심신 희열의 메커니즘</text:span><text:span/></text:p>
      <text:p text:style-name="P132"><text:span text:style-name="T583">🔑 핵심 키워드: 하행풍 상승, 단전 뚬모, 보리심 용해, 72,000 맥도, 심신 희열</text:span><text:span/></text:p>
      <text:p text:style-name="P133"><text:span text:style-name="T584">🌬️ 하행풍의 상승과 단전의 불꽃</text:span><text:span/></text:p>
      <text:p text:style-name="P134"><text:span text:style-name="T585">남녀가 결합하여 신체적인 마찰이 일어날 때, 우리 몸에서는 아주 독특한 에너지의 역전 현상이 발생해. 평소에는 대소변이나 정액을 아래로 밀어내는 역할을 하던 하행풍이라는 기운이, 이 강력한 자극을 통해 오히려 위쪽으로 힘차게 거슬러 올라가게 되거든. 이는 마치 평소에는 아래로 흐르던 분수대의 물줄기가 강력한 수압 펌프의 힘을 받아 하늘을 향해 거꾸로 솟구쳐 오르는 모습과 아주 비슷해. 이렇게 거꾸로 올라간 기운은 단전 부근에 잠들어 있던 보통의 뚬모, 즉</text:span><text:span text:style-name="T586"> 배꼽 밑의 근본적인 열기를 활활 타오르게 만드는 불씨가 된단다.</text:span><text:span/></text:p>
      <text:p text:style-name="P135"><text:span text:style-name="T587">🩸 하얀 보리심과 붉은 보리심의 용해</text:span><text:span/></text:p>
      <text:p text:style-name="P136"><text:span text:style-name="T588">단전에서 피어오른 강력한 열기는 우리 몸의 가장 깊은 곳에 숨겨진 신비로운 생명 에너지의 정수인 하얀 보리심과 붉은 보리심을 부드럽게 녹이기 시작해. 이 두 가지 정수는 우리 몸의 음양의 조화와 생명력을 지탱하는 가장 순수한 원천 물질이야. 마치 단단하게 얼어붙어 있던 고요한 만년설이 봄날의 따스한 햇볕을 받아 투명한 봄물로 스르르 녹아내리는 과정과 똑같지. 열기에 의해 액체처럼 흐르게 된 이 고귀한 에너지 정수들은 다음 단계의 신비로운 순환을 시작하게 </text:span><text:span text:style-name="T589">돼.</text:span><text:span/></text:p>
      <text:p text:style-name="P137"><text:span text:style-name="T590">🕸️ 72,000 맥도를 흐르는 희열의 파도</text:span><text:span/></text:p>
      <text:p text:style-name="P138"><text:span text:style-name="T591">녹아내린 보리심의 정수들은 우리 몸 구석구석에 거미줄처럼 촘촘하게 뻗어 있는 72,000개의 미세한 에너지 통로인 맥도를 타고 아래로 도도하게 흘러내리게 된단다. 평소에는 닫혀 있던 이 수많은 통로들이 순수한 생명 에너지로 가득 차면서, 온몸과 마음에 말로 표현할 수 없을 만큼 거대하고 깊은 희열의 파도가 치기 시작해. 우리가 극심한 가뭄 끝에 대지에 시원한 단비가 내릴 때 모든 생명이 생기를 되찾고 기뻐하듯, 온 신체 세포와 정신이 이 신성한 에너지를 </text:span><text:span text:style-name="T592">공급받으며 완벽한 만족감과 평온함을 누리게 되는 거야.</text:span><text:span/></text:p>
      <text:p text:style-name="P139"><text:span text:style-name="T593">🌊 절정의 순간과 물질적 결실</text:span><text:span/></text:p>
      <text:p text:style-name="P140"><text:span text:style-name="T594">에너지의 순환과 심신의 만족감이 최고조에 달해 마침내 성적인 에너지가 완벽한 절정에 이르게 되면, 그 신비로운 내면의 여정은 마지막 물질적 결실을 맺게 돼. 육체적 결합의 가장 마지막 단계에서 아주 짙고 밀도 높은 정액이 배출되는 현상이 일어나는 거지. 내면에서 강력하게 소용돌이치던 미세한 바람과 열기, 그리고 정신적인 희열의 에너지가 마침내 육체라는 현실의 스크린 위로 고스란히 투영되어 눈에 보이는 물질적 형태로 정제되어 나타나는 생명 활동의 마침표라고</text:span><text:span text:style-name="T595"> 할 수 있단다.</text:span><text:span/></text:p>
      <text:p text:style-name="P141"><text:span text:style-name="T596">📝 핵심 요약</text:span><text:span/></text:p>
      <text:list text:style-name="WWNum7" text:continue-numbering="true">
        <text:list-item>
          <text:p text:style-name="P142"><text:span text:style-name="T597">남녀의 신체적 결합과 마찰로 인해 아래로 흐르던 하행풍이 도리어 위로 상승함.</text:span><text:span/></text:p>
        </text:list-item>
        <text:list-item>
          <text:p text:style-name="P143"><text:span text:style-name="T598">상승한 기운이 단전의 뚬모를 자극하여 하얀 보리심과 붉은 보리심을 용해시킴.</text:span><text:span/></text:p>
        </text:list-item>
        <text:list-item>
          <text:p text:style-name="P144"><text:span text:style-name="T599">녹아내린 에너지가 72,000 맥도를 타고 흐르며 심신에 거대한 희열과 만족을 줌.</text:span><text:span/></text:p>
        </text:list-item>
        <text:list-item>
          <text:p text:style-name="P145"><text:span text:style-name="T600">성적 에너지가 최고의 절정에 도달하면서 마지막에 짙은 정액이 배출되며 마무리됨.</text:span><text:span/></text:p>
        </text:list-item>
      </text:list>
      <text:p text:style-name="P146"><text:span><text:soft-page-break/></text:span><text:span/><text:span/></text:p>
      <text:p text:style-name="P147"><text:span text:style-name="T601">[🟢 Online Mode | 26.06.05_15:44:21]</text:span><text:span/></text:p>
      <text:p text:style-name="P148"><text:span text:style-name="T602">114. 두 정혈의 화합과 의식의 자궁 진입</text:span><text:span/></text:p>
      <text:p text:style-name="P149"><text:span text:style-name="T603">🔑 핵심 키워드: 부모의 정혈, 자궁 내 화합, 우유 꺼풀 비유, 바르도 의식 진입, 생유의 시작</text:span><text:span/></text:p>
      <text:p text:style-name="P150"><text:span text:style-name="T604">🧬 부모 정혈의 물질적 결합</text:span><text:span/></text:p>
      <text:p text:style-name="P151"><text:span text:style-name="T605">바르도 여정의 종착지이자 새로운 삶의 출발점은 부모의 정과 혈이 자궁 안에서 만나는 물리적인 결합에서 시작해. 아버지가 전해준 정과 어머니가 전해준 혈이 한 방울씩 완벽하게 어우러지는 과정이지. 이것은 새 생명이 안전하게 깃들기 위해 건물 바닥에 단단한 기초 공사를 다지는 것과 같아. 아무리 뛰어난 영혼이라도 이 물질적인 바탕이 마련되지 않으면 다음 생의 몸을 입을 수 없단다.</text:span><text:span/></text:p>
      <text:p text:style-name="P152"><text:span text:style-name="T606">🥛 끓인 우유 꺼풀의 신비로운 비유</text:span><text:span/></text:p>
      <text:p text:style-name="P153"><text:span text:style-name="T607">자궁 안에서 화합한 두 정혈은 마치 따뜻하게 끓여낸 우유 표면에 부드럽게 감도는 얇은 꺼풀 같은 상태를 형성하게 돼. 우유를 고온으로 끓인 뒤 가만히 두면 상단에 아주 미세하고 영양이 풍부한 단백질 막이 생겨나는 장면을 본 적이 있을 거야. 이 얇은 막처럼 정혈의 결합물은 지극히 섬세하고 부드러우며, 새로운 의식을 품어줄 가장 따뜻하고 안전한 요람의 형태를 갖추게 되지.</text:span><text:span/></text:p>
      <text:p text:style-name="P154"><text:span text:style-name="T608">🕊️ 바르도 의식의 정중앙 진입</text:span><text:span/></text:p>
      <text:p text:style-name="P155"><text:span text:style-name="T609">이 섬세한 정혈의 막이 완성되는 바로 그 순간, 중간 존재로서의 수명을 다한 바르도의 의식이 꺼풀의 가장 정중앙으로 스며들듯 들어가게 돼. 마치 넓은 우주를 비행하던 탐사선이 정확하게 조준된 도킹 스테이션의 한가운데로 부드럽게 안착하는 모습과 완벽하게 일치하지. 이 진입을 통해 의식은 비로소 물질 세계와 다시 강력하게 결합하는 생명의 끈을 형성하게 된단다.</text:span><text:span/></text:p>
      <text:p text:style-name="P156"><text:span text:style-name="T610">⏳ 중간 상태의 종말과 새로운 구속</text:span><text:span/></text:p>
      <text:p text:style-name="P157"><text:span text:style-name="T611">바르도의 의식이 정혈의 중심에 들어가는 사건은 자유로웠던 영체로서의 존재가 마감되고 다시 육체에 갇히는 생유의 시작을 뜻해. 하나의 문이 닫히며 동시에 다른 세상의 문이 열리는 장엄한 전환점이지. 의식이 물질의 요람에 결합하면서 일어나는 존재의 변화를 직관적인 구조로 비교해 줄게.</text:span><text:span/></text:p>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158"><text:span text:style-name="T612">존재 상태</text:span><text:span/></text:p>
          </table:table-cell>
          <table:table-cell table:style-name="ce3">
            <text:p text:style-name="P159"><text:span text:style-name="T613">진입 전 (바르도)</text:span><text:span/></text:p>
          </table:table-cell>
          <table:table-cell table:style-name="ce4">
            <text:p text:style-name="P160"><text:span text:style-name="T614">진입 후 (생유)</text:span><text:span/></text:p>
          </table:table-cell>
        </table:table-row>
        <table:table-row table:style-name="ro2" table:default-cell-style-name="ce1">
          <table:table-cell table:style-name="ce5">
            <text:p text:style-name="P161"><text:span text:style-name="T615">신체 형태</text:span><text:span/></text:p>
          </table:table-cell>
          <table:table-cell table:style-name="ce6">
            <text:p text:style-name="P162"><text:span text:style-name="T616">물질적 제약이 없는 자유로운 영체</text:span><text:span/></text:p>
          </table:table-cell>
          <table:table-cell table:style-name="ce7">
            <text:p text:style-name="P163"><text:span text:style-name="T617">정혈의 꺼풀 속에 갇힌 미세한 태아</text:span><text:span/></text:p>
          </table:table-cell>
        </table:table-row>
        <table:table-row table:style-name="ro3" table:default-cell-style-name="ce1">
          <table:table-cell table:style-name="ce8">
            <text:p text:style-name="P164"><text:span text:style-name="T618">의식 영역</text:span><text:span/></text:p>
          </table:table-cell>
          <table:table-cell table:style-name="ce9">
            <text:p text:style-name="P165"><text:span text:style-name="T619">사후 세계의 공간을 자유롭게 유랑함</text:span><text:span/></text:p>
          </table:table-cell>
          <table:table-cell table:style-name="ce10">
            <text:p text:style-name="P166"><text:span text:style-name="T620">자궁이라는 물질적 공간에 강력히 구속됨</text:span><text:span/></text:p>
          </table:table-cell>
        </table:table-row>
      </table:table>
      <text:p text:style-name="P167"><text:span text:style-name="T621">📝 핵심 요약</text:span><text:span/></text:p>
      <text:list text:style-name="WWNum8" text:continue-numbering="true">
        <text:list-item>
          <text:p text:style-name="P168"><text:span text:style-name="T622">새로운 환생의 시작을 위해 부모의 정과 혈이 어머니의 자궁 속에서 반드시 한 방울씩 만나 화합해.</text:span><text:span/></text:p>
        </text:list-item>
        <text:list-item>
          <text:p text:style-name="P169"><text:span text:style-name="T623">화합한 정혈은 끓인 우유 표면에 생기는 섬세하고 얇은 꺼풀과 같은 영양 가득한 요람을 형성해.</text:span><text:span/></text:p>
        </text:list-item>
        <text:list-item>
          <text:p text:style-name="P170"><text:span text:style-name="T624">중간 존재로서의 삶을 마감하는 바르도의 의식이 이 우유 꺼풀 같은 조직의 정중앙으로 진입해.</text:span><text:span/></text:p>
        </text:list-item>
        <text:list-item>
          <text:p text:style-name="P171"><text:span text:style-name="T625">이 결합을 통해 자유롭던 영체의 상태가 끝나고 육체의 구속을 받는 새로운 생유의 단계가 시작돼.</text:span><text:span/></text:p>
        </text:list-item>
      </text:list>
      <text:p text:style-name="P172"><text:span><text:soft-page-break/></text:span><text:span/><text:span/></text:p>
      <text:p text:style-name="P173"><text:span text:style-name="T626">115. 새로운 생명을 향한 의식의 세 가지 진입로</text:span><text:span/></text:p>
      <text:p text:style-name="P174"><text:span text:style-name="T627">🔑 핵심 키워드: 바르도 의식, 진입 경로, 세 가지 문, 부친과 모친, 환생의 시작</text:span><text:span/></text:p>
      <text:p text:style-name="P175"><text:span text:style-name="T628">🚪 새로운 세계로 들어가는 영혼의 통로</text:span><text:span/></text:p>
      <text:p text:style-name="P176"><text:span text:style-name="T629">바르도에 머물던 의식이 다음 생을 받아 태어나기 위해 육체 안으로 진입하는 구체적인 방법에 대한 가르침이야. 비유하자면 넓고 텅 빈 가상 세계를 떠돌던 유저의 데이터가 실제 게임 플레이를 시작하기 위해 특정 서버의 로그인 게이트를 통과하는 과정과 아주 비슷하지. 이 진입 과정은 아무렇게나 무질서하게 일어나는 것이 아니라, 정해진 세 가지 비밀 통로 중 하나를 통해 정밀하게 이루어지게 돼.</text:span><text:span/></text:p>
      <text:p text:style-name="P177"><text:span text:style-name="T630">🌬️ 부친의 몸을 통하는 두 가지 영적 포트</text:span><text:span/></text:p>
      <table:table table:style-name="ta2">
        <table:table-columns>
          <table:table-column table:style-name="co4"/>
          <table:table-column table:style-name="co5"/>
          <table:table-column table:style-name="co6"/>
        </table:table-columns>
        <table:table-row table:style-name="ro4" table:default-cell-style-name="ce11">
          <table:table-cell table:style-name="ce12">
            <text:p text:style-name="P178"><text:span text:style-name="T631">진입 경로</text:span><text:span/></text:p>
          </table:table-cell>
          <table:table-cell table:style-name="ce13">
            <text:p text:style-name="P179"><text:span text:style-name="T632">신체적 위치</text:span><text:span/></text:p>
          </table:table-cell>
          <table:table-cell table:style-name="ce14">
            <text:p text:style-name="P180"><text:span text:style-name="T633">에너지적 비유</text:span><text:span/></text:p>
          </table:table-cell>
        </table:table-row>
        <table:table-row table:style-name="ro5" table:default-cell-style-name="ce11">
          <table:table-cell table:style-name="ce15">
            <text:p text:style-name="P181"><text:span text:style-name="T634">아버지의 입</text:span><text:span/></text:p>
          </table:table-cell>
          <table:table-cell table:style-name="ce16">
            <text:p text:style-name="P182"><text:span text:style-name="T635">호흡과 음식이 오가는 통로</text:span><text:span/></text:p>
          </table:table-cell>
          <table:table-cell table:style-name="ce17">
            <text:p text:style-name="P183"><text:span text:style-name="T636">집의 정문을 통해 자연스럽게 걸어 들어가는 입구</text:span><text:span/></text:p>
          </table:table-cell>
        </table:table-row>
        <table:table-row table:style-name="ro6" table:default-cell-style-name="ce11">
          <table:table-cell table:style-name="ce18">
            <text:p text:style-name="P184"><text:span text:style-name="T637">아버지의 정수리</text:span><text:span/></text:p>
          </table:table-cell>
          <table:table-cell table:style-name="ce19">
            <text:p text:style-name="P185"><text:span text:style-name="T638">영적 에너지가 소통하는 숫구멍</text:span><text:span/></text:p>
          </table:table-cell>
          <table:table-cell table:style-name="ce20">
            <text:p text:style-name="P186"><text:span text:style-name="T639">하늘을 향해 열려 있는 지붕의 천창이나 안테나</text:span><text:span/></text:p>
          </table:table-cell>
        </table:table-row>
      </table:table>
      <text:p text:style-name="P187"><text:span text:style-name="T640">의식은 먼저 아버지의 신체를 경유하는 통로를 선택할 수 있어. 호흡의 흐름을 타고 입을 통해 들어가거나, 영적인 에너지가 가장 순수하게 교류되는 정수리의 숨구멍을 통해 스며드는 방식이지. 이는 마치 외부의 라디오 신호가 안테나를 통해 수신기 내부로 매끄럽게 흡수되는 현상과 흡사해.</text:span><text:span/></text:p>
      <text:p text:style-name="P188"><text:span text:style-name="T641">🌊 모친의 자궁으로 향하는 직접적인 게이트</text:span><text:span/></text:p>
      <text:p text:style-name="P189"><text:span text:style-name="T642">마지막 세 번째 경로는 어머니의 음문을 통해 새로운 생명이 잉태되는 자궁으로 직접 미끄러져 들어가는 방식이야. 생명이 자라나는 우주의 거대한 요람 안으로 곧바로 진입하는 것과 같지. 외부의 거친 환경에서 벗어나 가장 따뜻하고 안전한 모태의 중심부로 다이렉트 연결을 시도하는 가장 직관적인 진입로라고 볼 수 있어.</text:span><text:span/></text:p>
      <text:p text:style-name="P190"><text:span text:style-name="T643">🧭 업의 나침반이 결정하는 자동 로그인</text:span><text:span/></text:p>
      <text:p text:style-name="P191"><text:span text:style-name="T644">이 세 가지 문 중에서 어떤 문을 통과하게 될지는 의식이 임의로 고르는 것이 아니라, 전생부터 쌓아온 업의 인연과 에너지의 주파수에 따라 자동으로 결정돼. 비유하자면 스마트폰이 주변의 여러 와이파이 신호 중 자신과 비밀번호가 딱 맞아떨어지는 가장 강한 신호에 자동으로 접속하는 원리와 똑같지. 보이지 않는 영적인 끌림이 의식을 가장 적합한 통로로 안전하게 인도하는 셈이야.</text:span><text:span/></text:p>
      <text:p text:style-name="P192"><text:span text:style-name="T645">📝 핵심 요약</text:span><text:span/></text:p>
      <text:list text:style-name="WWNum9" text:continue-numbering="true">
        <text:list-item>
          <text:p text:style-name="P193"><text:span text:style-name="T646">바르도의 의식이 새로운 생명으로 태어나기 위해 육체로 진입하는 경로는 정확히 세 가지로 규정됨.</text:span><text:span/></text:p>
        </text:list-item>
        <text:list-item>
          <text:p text:style-name="P194"><text:span text:style-name="T647">첫 번째와 두 번째 경로는 아버지의 입이나 정수리의 숫구멍을 통해 영적으로 경유하는 방식임.</text:span><text:span/></text:p>
        </text:list-item>
        <text:list-item>
          <text:p text:style-name="P195"><text:span text:style-name="T648">세 번째 경로는 어머니의 음문을 통해 새로운 생명이 자라날 자궁으로 직접 진입하는 방식임.</text:span><text:span/></text:p>
        </text:list-item>
        <text:list-item>
          <text:p text:style-name="P196"><text:span text:style-name="T649">어떤 통로를 통과할지는 의식의 주관적 선택이 아니라 업의 인연과 주파수에 따라 자동으로 매칭됨.</text:span><text:span/></text:p>
        </text:list-item>
      </text:list>
      <text:p text:style-name="P197"><text:span><text:soft-page-break/></text:span><text:span/><text:span/></text:p>
      <text:p text:style-name="P198"><text:span text:style-name="T650">[🟢 Online Mode | 26.06.05_15:44:34]</text:span><text:span/></text:p>
      <text:p text:style-name="P199"><text:span text:style-name="T651">116. 명점과의 결합과 초고속 의식의 소멸</text:span><text:span/></text:p>
      <text:p text:style-name="P200"><text:span text:style-name="T652">🔑 핵심 키워드: 명점 결합, 분별심 은멸, 삼광명 발생, 바르도 죽음, 정광명 찰나</text:span><text:span/></text:p>
      <text:p text:style-name="P201"><text:span text:style-name="T653">🧬 72,000 맥도와 명점의 신비로운 도킹</text:span><text:span/></text:p>
      <text:p text:style-name="P202"><text:span text:style-name="T654">바르도에 머물던 의식은 다음 단계로 넘어가기 위해 몸속에 펼쳐진 72,000개의 미세한 에너지 통로인 맥도를 타고 내려오게 돼. 이때 의식은 깨달음과 영적 희열을 만들어내는 가장 순수한 생명 에너지의 정수인 명점과 극적으로 결합하지. 이것은 거대한 우주 공간을 비행하던 최첨단 우주선이 수만 개의 정밀한 궤도를 통과해 마침내 우주 정거장의 핵심 동력원과 완벽하게 도킹하는 장엄한 장면과 똑같아. 이 결합을 통해 의식은 물질적 차원을 넘어 한층 더 미세하고 강</text:span><text:span text:style-name="T655">력한 영적 변화의 에너지를 얻게 되는 거야.</text:span><text:span/></text:p>
      <text:p text:style-name="P203"><text:span text:style-name="T656">🛑 80가지 분별심과 에너지 바람의 정지</text:span><text:span/></text:p>
      <text:p text:style-name="P204"><text:span text:style-name="T657">명점과 결합하는 순간, 바르도 상태에서 우리를 복잡하게 만들었던 80가지 자성의 분별하는 마음들과 그 생각들을 사방으로 실어 나르던 미세한 에너지의 바람들이 일시에 멈추어 서게 돼. 마치 수십 개의 프로그램이 시끄럽게 돌아가던 컴퓨터의 메인 전원을 내리는 순간, 모든 화면이 정지하고 윙윙거리던 냉각팬의 바람 소리가 단숨에 뚝 끊기며 고요해지는 것과 같지. 세상을 나누어 보던 거친 생각의 소음들이 완벽하게 청소되는 정화의 단계야.</text:span><text:span/></text:p>
      <text:p text:style-name="P205"><text:span text:style-name="T658">💡 현명과 증휘 그리고 근득의 순차적 깨어남</text:span><text:span/></text:p>
      <text:p text:style-name="P206"><text:span text:style-name="T659">거친 생각들이 모두 사라진 텅 빈 자리에, 마침내 마음의 원초적인 빛들이 차례대로 고개를 들기 시작해. 가장 먼저 아주 맑고 밝은 마음인 현명이 나타나고, 뒤이어 한층 더 깊고 투명하게 빛나는 증휘가 피어나며, 마지막으로 근원의 빛에 완전히 밀착된 정광명에 가까운 마음인 근득이 순서대로 발생하지. 어두운 무대 위에서 차단막이 하나씩 걷힐 때마다 흰색, 붉은색, 검은색의 순수한 레이저 조명이 차례차례 켜지며 공간을 가득 채우는 것처럼, 의식의 차원이 아주 </text:span><text:span text:style-name="T660">정밀하게 심화되는 과정이란다.</text:span><text:span/></text:p>
      <text:p text:style-name="P207"><text:span text:style-name="T661">⚡ 번개처럼 스쳐 지나가는 죽음의 정광명</text:span><text:span/></text:p>
      <text:p text:style-name="P208"><text:span text:style-name="T662">이 여정의 종착지에서 마침내 바르도 존재의 죽음을 알리는 가장 깊은 순수 의식인 죽음의 정광명이 눈을 뜨게 돼. 하지만 이번 단계에서 나타나는 정광명은 우리가 이전에 거친 육체를 벗어던질 때 경험했던 빛보다 머무는 시간이 극도로 짧다는 결정적인 특징이 있어. 밤하늘을 순식간에 가르고 지나가는 선명한 별똥별이나, 카메라 플래시가 번쩍하는 순간 너무나 강렬한 빛을 뿜어낸 뒤 곧바로 암전되는 것처럼, 발생과 동시에 알아차릴 새도 없이 아주 빠르게 은멸해 버리는</text:span><text:span text:style-name="T663"> 찰나의 순간이지.</text:span><text:span/></text:p>
      <text:p text:style-name="P209"><text:span text:style-name="T664">📝 핵심 요약</text:span><text:span/></text:p>
      <text:list text:style-name="WWNum10" text:continue-numbering="true">
        <text:list-item>
          <text:p text:style-name="P210"><text:span text:style-name="T665">바르도의 의식은 72,000개의 미세한 맥도를 타고 내려오는 생명의 정수인 명점과 결합한다.</text:span><text:span/></text:p>
        </text:list-item>
        <text:list-item>
          <text:p text:style-name="P211"><text:span text:style-name="T666">이 결합의 힘으로 바르도 상태의 80가지 분별심과 이동하던 에너지의 바람들이 일시에 은멸한다.</text:span><text:span/></text:p>
        </text:list-item>
        <text:list-item>
          <text:p text:style-name="P212"><text:span text:style-name="T667">거친 의식이 멈춘 자리에 현명, 증휘, 근득이라는 세 가지 밝은 마음이 순차적으로 깨어난다.</text:span><text:span/></text:p>
        </text:list-item>
        <text:list-item>
          <text:p text:style-name="P213"><text:span text:style-name="T668">마지막으로 나타나는 바르도 죽음의 정광명은 이전과 달리 번개처럼 극히 짧은 찰나에만 발생하고 소멸한다.</text:span><text:span/></text:p>
        </text:list-item>
      </text:list>
      <text:p text:style-name="P214"><text:span><text:soft-page-break/></text:span><text:span/><text:span/></text:p>
      <text:p text:style-name="P215"><text:span text:style-name="T669">[🟢 Online Mode | 26.06.05_15:44:42]</text:span><text:span/></text:p>
      <text:p text:style-name="P216"><text:span text:style-name="T670">117. 부모의 정혈과의 합일과 새로운 생명의 시작</text:span><text:span/></text:p>
      <text:p text:style-name="P217"><text:span text:style-name="T671">🔑 핵심 키워드: 역순의 용해, 정광명의 연속, 부모의 정혈, 근득의 마음</text:span><text:span/></text:p>
      <text:p text:style-name="P218"><text:span text:style-name="T672">🌀 역순으로 깨어나는 내면의 신호들</text:span><text:span/></text:p>
      <text:p text:style-name="P219"><text:span text:style-name="T673">바르도 존재가 새로운 몸을 입기 위해 모태와 결합하는 순간, 임종 때 겪었던 에너지 해체 과정이 다시 한번 역순으로 빠르게 재생돼. 아지랑이 같은 미세한 물질적 징후부터 시작해서 의식의 가장 깊은 본질인 정광명에 이르기까지의 현상들이 차례대로 스쳐 지나가지. 이것은 마치 밤새 깊은 잠에 빠져들 때 의식이 끊겼다가, 아침에 눈을 뜰 때 어렴풋한 의식부터 시작해 오감이 하나씩 되살아나는 과정과 아주 비슷해.</text:span><text:span/></text:p>
      <text:p text:style-name="P220"><text:span text:style-name="T674">💧 부모의 정혈과 미세 의식의 융합</text:span><text:span/></text:p>
      <text:p text:style-name="P221"><text:span text:style-name="T675">그 고요한 정광명의 흐름 속에서 마지막 미세한 광명이 부모의 정액과 난자가 결합한 물질적 중심부로 정밀하게 진입하게 돼. 전생의 모든 업과 기억을 담은 가장 순수한 에너지 유전자가 새로운 육체의 씨앗과 마침내 결합하는 순간이지. 비유하자면 우주선이 광활한 우주를 비행하다가 목적지 행성의 기지에 정확하게 도킹하여 에너지를 공급받기 시작하는 장엄한 장면과 같아.</text:span><text:span/></text:p>
      <text:p text:style-name="P222"><text:span text:style-name="T676">⚡ 생명의 탄생과 역순의 의식 발생</text:span><text:span/></text:p>
      <text:p text:style-name="P223"><text:span text:style-name="T677">새로운 생명을 부여받아 자궁에 자리를 잡는 바로 그 찰나에, 정광명에 가장 가까운 미세한 마음인 근득의 상태가 동시에 깨어나게 돼. 의식이 물질적인 몸을 입음과 동시에, 정신적 활동을 재개하기 위한 메인 제어 장치가 전원을 켜는 셈이야. 이 결합과 의식의 발생은 정밀한 시계의 톱니바퀴들이 서로 맞물려 한 치의 오차도 없이 동시에 돌아가는 것처럼 완벽한 타이밍으로 이루어져.</text:span><text:span/></text:p>
      <text:p text:style-name="P224"><text:span text:style-name="T678">🧬 새로운 윤회의 시작과 깨달음의 기회</text:span><text:span/></text:p>
      <text:p text:style-name="P225"><text:span text:style-name="T679">이렇게 물질과 정신이 완벽하게 결합하면서 영혼은 바르도라는 긴 터널을 빠져나와 새로운 생의 여정을 시작하게 돼. 거친 육체 속으로 미세한 의식이 다시 깃드는 이 순간은, 우리가 다시 한번 인간의 몸을 통해 수행하고 깨달음을 얻을 수 있는 소중한 기회를 얻었음을 의미하지. 이 신비로운 탄생의 메커니즘을 명확히 아는 것이야말로 사후의 혼란을 극복하고 영적으로 성장하는 강력한 나침반이 될 거야.</text:span><text:span/></text:p>
      <text:p text:style-name="P226"><text:span text:style-name="T680">📝 핵심 요약</text:span><text:span/></text:p>
      <text:list text:style-name="WWNum11" text:continue-numbering="true">
        <text:list-item>
          <text:p text:style-name="P227"><text:span text:style-name="T681">바르도 유정이 모태에 드는 순간 아지랑이부터 정광명까지의 현상이 역순으로 일어난다.</text:span><text:span/></text:p>
        </text:list-item>
        <text:list-item>
          <text:p text:style-name="P228"><text:span text:style-name="T682">정광명의 연속성이 부모의 정혈이 결합한 중심부와 만나 새로운 생명을 형성한다.</text:span><text:span/></text:p>
        </text:list-item>
        <text:list-item>
          <text:p text:style-name="P229"><text:span text:style-name="T683">새로운 생명을 받는 동시성에 정광명에 가장 가까운 미세한 의식인 근득의 마음이 함께 깨어난다.</text:span><text:span/></text:p>
        </text:list-item>
        <text:list-item>
          <text:p text:style-name="P230"><text:span text:style-name="T684">이 동시적 결합은 정신과 물질이 완벽하게 융합하여 새로운 수행의 바탕을 만드는 과정이다.</text:span><text:span/></text:p>
        </text:list-item>
      </text:list>
      <text:p text:style-name="P231"><text:span><text:soft-page-break/></text:span><text:span/><text:span/></text:p>
      <text:p text:style-name="P232"><text:span text:style-name="T685">[🟢 Online Mode | 26.06.05_15:44:47]</text:span><text:span/></text:p>
      <text:p text:style-name="P233"><text:span text:style-name="T686">118. 정광명에 가까운 마음과 새로운 생명의 첫 시작</text:span><text:span/></text:p>
      <text:p text:style-name="P234"><text:span text:style-name="T687">🔑 핵심 키워드: 정광명에 가까운 마음, 제일찰나, 생유, 모태의 결합</text:span><text:span/></text:p>
      <text:p text:style-name="P235"><text:span text:style-name="T688">⚡ 미세한 의식이 깨어나는 첫 번째 스파크</text:span><text:span/></text:p>
      <text:p text:style-name="P236"><text:span text:style-name="T689">어둠을 뚫고 정광명에 가까운 마음이 고개를 드는 그 아주 짧은 첫 번째 순간인 제일찰나는 새로운 생명이 완벽하게 시작되는 위대한 도약점이야. 컴퓨터의 전원 버튼을 누르자마자 전류가 흐르며 내부 시스템에 아주 미세한 첫 번째 불꽃이 튀는 순간과 같지. 이 찰나의 순간에 보이지 않던 미세한 의식 에너지가 다시 역동적으로 움직이기 시작하는 거야.</text:span><text:span/></text:p>
      <text:p text:style-name="P237"><text:span text:style-name="T690">🏷️ 생유라는 새로운 이름표의 탄생</text:span><text:span/></text:p>
      <text:p text:style-name="P238"><text:span text:style-name="T691">이 첫 번째 찰나의 마음은 우리가 비로소 하나의 생명이 온전하게 태어났다고 선언할 수 있는 근본적인 토대가 되어줘. 불교에서는 이를 생명이 시작되는 순간이라는 뜻에서 생유라는 이름으로 부르지. 마치 마라톤 선수가 출발선에서 총소리와 함께 첫발을 내딛는 그 상징적인 순간에 출발이라는 공식 타이틀을 붙이는 것과 똑같은 이치야.</text:span><text:span/></text:p>
      <text:p text:style-name="P239"><text:span text:style-name="T692">🔌 모태와의 운명적인 첫 번째 도킹</text:span><text:span/></text:p>
      <text:p text:style-name="P240"><text:span text:style-name="T693">이 미세한 마음은 방황하던 바르도의 여정을 완전히 끝마치고, 어머니의 따뜻한 모태에 최초로 단단하게 생명의 끈을 묶는 주체이기도 해. 우주선이 광활한 우주를 헤매다가 마침내 목적지인 우주 정거장에 한 치의 오차도 없이 안전하게 착륙하여 플러그를 꽂는 장엄한 도킹 과정과 아주 비슷해. 이 도킹을 통해 영혼은 새로운 육체라는 집을 얻게 되는 셈이지.</text:span><text:span/></text:p>
      <text:p text:style-name="P241"><text:span text:style-name="T694">🔄 윤회의 무대가 새로 열리는 순간</text:span><text:span/></text:p>
      <text:p text:style-name="P242"><text:span text:style-name="T695">결국 이 정광명에 가까운 마음의 첫 시작은 과거의 모든 기억과 업을 품은 채 새로운 삶의 드라마를 펼치기 위한 첫 번째 커튼콜이야. 하나의 막이 내리고 잠시 어둠이 찾아왔다가 다시 새로운 무대의 조명이 탁 켜지는 순간처럼 말이야. 이 신비로운 결합을 시작으로 우리는 새로운 육신을 입고 이번 생의 소중한 영적 성장 여정을 다시금 힘차게 출발할 수 있게 돼.</text:span><text:span/></text:p>
      <text:p text:style-name="P243"><text:span text:style-name="T696">📝 핵심 요약</text:span><text:span/></text:p>
      <text:list text:style-name="WWNum12" text:continue-numbering="true">
        <text:list-item>
          <text:p text:style-name="P244"><text:span text:style-name="T697">정광명에 가까운 마음이 시작되는 첫 번째 찰나는 새로운 생명이 잉태되는 근본 지점임.</text:span><text:span/></text:p>
        </text:list-item>
        <text:list-item>
          <text:p text:style-name="P245"><text:span text:style-name="T698">이 최초의 순간을 생명이 본격적으로 시작된다는 의미에서 생유라고 명명함.</text:span><text:span/></text:p>
        </text:list-item>
        <text:list-item>
          <text:p text:style-name="P246"><text:span text:style-name="T699">미세한 의식이 어머니의 모태와 최초로 결합하여 생명의 인연을 맺는 결정적인 사건임.</text:span><text:span/></text:p>
        </text:list-item>
        <text:list-item>
          <text:p text:style-name="P247"><text:span text:style-name="T700">우주선이 정거장에 도킹하듯 바르도를 끝내고 새로운 삶의 무대로 진입하는 출발점임.</text:span><text:span/></text:p>
        </text:list-item>
      </text:list>
      <text:p text:style-name="P248"><text:span><text:soft-page-break/></text:span><text:span/><text:span/></text:p>
      <text:p text:style-name="P249"><text:span text:style-name="T701">119. 의식의 역행과 거친 분별심의 부활</text:span><text:span/></text:p>
      <text:p text:style-name="P250"><text:span text:style-name="T702">🔑 핵심 키워드: 역차제, 근득·증휘·현명, 80자성, 생명의 바람</text:span><text:span/></text:p>
      <text:p text:style-name="P251"><text:span text:style-name="T703">🌌 의식이 가장 순수하고 미세한 상태에서 다시 거친 현실의 세계로 돌아오는 '역차제'의 과정이 시작되는 단계야. 앞서 모든 에너지가 하나로 뭉쳤던 그 깊은 고요의 정점에서, 이제 의식이 거꾸로 깨어나기 시작하는 거지. 마치 컴퓨터를 완전히 껐다가 다시 전원 버튼을 누르면, 깊은 어둠 속에서 메인 보드가 먼저 반응하며 아주 미세한 전류가 다시 흐르기 시작하는 모습과 똑같아. 가장 먼저 정광명에 가까운 마음(근득)의 두 번째 찰나가 고개를 들며 깨어남의 신호</text:span><text:span text:style-name="T704">탄을 쏘아 올려.</text:span><text:span/></text:p>
      <text:p text:style-name="P252"><text:span text:style-name="T705">💡 근득의 단계를 지나면 의식은 한층 더 밝아지는 마음인 '증휘'의 상태로 나아가고, 연이어 사물을 온전히 인식하기 직전의 밝은 마음인 '현명'의 상태로 차례차례 이행하게 돼. 이 과정은 깊은 잠에서 깨어날 때 의식이 점점 또렷해지는 흐름과 완전히 닮아 있어. 캄캄했던 방 안으로 새벽빛이 희미하게 들어오다가(증휘), 순식간에 방 안의 물건들이 흐릿하게나마 형체를 드러내며 환해지는(현명) 변화와 같은 맥락이지. 아주 미세했던 에너지들이 점차 거친 물질의 세</text:span><text:span text:style-name="T706">계를 향해 계단을 밟듯 한 칸씩 올라오는 중이야.</text:span><text:span/></text:p>
      <text:p text:style-name="P253"><text:span text:style-name="T707">🌪️ 현명의 단계를 거치고 나면, 마침내 우리가 평소에 늘 사용하는 '80가지 자성의 분별심'들이 일제히 깨어나기 시작해. 이 분별의 마음들은 독단적으로 움직이지 않고, 자신들을 온몸으로 실어 나르는 거친 '생명의 바람'들과 한 세트가 되어 동시에 발생하지. 비유하자면, 자동차의 엔진(생명의 바람)이 굉음을 내며 걸림과 동시에 대시보드의 수많은 계기판과 내비게이션(80자성의 분별심)에 한꺼번에 불이 들어오며 달릴 준비를 마치는 것과 같단다.</text:span><text:span/></text:p>
      <text:p text:style-name="P254"><text:span text:style-name="T708">🧘 밀교에서는 이 역행의 과정을 정확히 인지하는 것을 매우 중요하게 여겨. 죽음의 순간에 깨달음을 얻지 못하면 의식은 이 순서대로 다시 거칠어져 결국 바르도나 다음 생의 모태로 들어가게 되거든. 하지만 이 흐름을 미리 완벽하게 숙지하고 있는 수행자는 의식이 거칠어지는 순간에도 그 흐름에 휩쓸리지 않고, 자신이 깨어나는 전 과정을 지혜롭게 지켜보며 제어할 수 있는 강력한 통제력을 쥐게 돼.</text:span><text:span/></text:p>
      <text:p text:style-name="P255"><text:span text:style-name="T709">📝 핵심 요약</text:span><text:span/></text:p>
      <text:list text:style-name="WWNum13" text:continue-numbering="true">
        <text:list-item>
          <text:p text:style-name="P256"><text:span text:style-name="T710">가장 미세한 정광명 상태에서 다시 거친 의식으로 돌아오는 역차제 과정임</text:span><text:span/></text:p>
        </text:list-item>
        <text:list-item>
          <text:p text:style-name="P257"><text:span text:style-name="T711">근득의 제이찰나를 거쳐 증휘와 현명의 마음이 차례대로 깨어남</text:span><text:span/></text:p>
        </text:list-item>
        <text:list-item>
          <text:p text:style-name="P258"><text:span text:style-name="T712">최종적으로 80가지 자성의 분별심과 이를 실어 나르는 거친 생명의 바람이 동시에 발생함</text:span><text:span/></text:p>
        </text:list-item>
        <text:list-item>
          <text:p text:style-name="P259"><text:span text:style-name="T713">이 역행의 흐름을 이해함으로써 수행자는 의식이 거칠어지는 순간에도 주도권을 유지할 수 있음</text:span><text:span/></text:p>
        </text:list-item>
      </text:list>
      <text:p text:style-name="P260"><text:span><text:soft-page-break/></text:span><text:span/><text:span/></text:p>
      <text:p text:style-name="P261"><text:span text:style-name="T714">120. 미세한 에너지로부터 거친 물질 원소들의 역순 재탄생</text:span><text:span/></text:p>
      <text:p text:style-name="P262"><text:span text:style-name="T715">🔑 핵심 키워드: 밝은 마음, 미세한 생명의 바람, 사대 원소, 역순 발생, 의식의 의지처</text:span><text:span/></text:p>
      <text:p text:style-name="P263"><text:span text:style-name="T716">🏗️ 역순으로 작동하는 우주의 재건축 시작</text:span><text:span/></text:p>
      <text:p text:style-name="P264"><text:span text:style-name="T717">죽음의 과정에서 모든 물질이 미세하게 녹아내렸다면, 이제는 반대로 가장 미세한 곳에서부터 거친 물질 세계를 향해 거꾸로 건물을 지어 올리는 재건축이 시작돼. 밝은 마음의 운반체인 미세한 생명의 바람이 씨앗이 되어, 우리가 다시 세상을 인식하고 활동할 수 있도록 거친 의식의 뼈대를 만들기 시작하는 거지.</text:span><text:span/></text:p>
      <text:p text:style-name="P265"><text:span text:style-name="T718">🌪️ 바람과 불 원소의 순차적인 출현</text:span><text:span/></text:p>
      <text:p text:style-name="P266"><text:span text:style-name="T719">가장 먼저 거친 의식의 든든한 기반이 되는 특별한 능력을 지닌 바람 원소가 힘차게 뿜어져 나와. 마치 진공 상태였던 공간에 신선한 공기가 유입되며 거대한 흐름이 생기는 것과 같지. 그다음에는 이 바람의 에너지를 바탕으로 따뜻한 온기와 에너지를 담당하는 불 원소가 차례로 발생하게 돼. 차가운 엔진에 시동을 걸어 뜨거운 열기를 뿜어내듯, 생명 활동을 위한 최소한의 동력을 확보하는 단계야.</text:span><text:span/></text:p>
      <text:p text:style-name="P267"><text:span text:style-name="T720">💧 물과 땅 원소의 물질적 완성</text:span><text:span/></text:p>
      <text:p text:style-name="P268"><text:span text:style-name="T721">에너지가 점점 더 구체적인 형태로 뭉치면서, 이번에는 모든 것을 하나로 연결하고 적셔주는 물 원소가 생겨나. 그리고 마지막으로 그 물기들을 단단하게 굳혀서 흔들리지 않는 신체적 기초를 만들어주는 땅 원소가 최종적으로 결합하게 되지. 마른 모래에 물을 부어 단단한 진흙 반죽을 만들고 벽돌을 찍어내듯, 눈에 보이지 않던 미세한 에너지가 마침내 만질 수 있는 견고한 바탕으로 완성되는 과정이야.</text:span><text:span/></text:p>
      <text:p text:style-name="P269"><text:span text:style-name="T722">📦 거친 의식이 머무를 완벽한 안착방 완성</text:span><text:span/></text:p>
      <text:p text:style-name="P270"><text:span text:style-name="T723">이렇게 바람, 불, 물, 땅의 사대 원소가 차례대로 다시 일어나는 이유는, 우리의 거친 의식이 안전하게 머무를 수 있는 의지처를 마련하기 위해서야. 컴퓨터의 소프트웨어가 안정적으로 구동되기 위해 하드웨어 부품들이 순서대로 조립되는 것과 똑같지. 가장 미세했던 영혼의 불꽃이 이 거친 원소들의 옷을 겹겹이 입음으로써, 마침내 새로운 생명체로서 세상과 다시 소통할 준비를 완벽하게 마치게 되는 거란다.</text:span><text:span/></text:p>
      <text:p text:style-name="P271"><text:span text:style-name="T724">📝 핵심 요약</text:span><text:span/></text:p>
      <text:list text:style-name="WWNum14" text:continue-numbering="true">
        <text:list-item>
          <text:p text:style-name="P272"><text:span text:style-name="T725">죽음의 해체 과정과는 반대로 미세한 생명의 바람으로부터 거친 원소들이 역순으로 재탄생한다.</text:span><text:span/></text:p>
        </text:list-item>
        <text:list-item>
          <text:p text:style-name="P273"><text:span text:style-name="T726">거친 의식을 지탱하기 위해 움직임의 바람 원소와 온기의 불 원소가 먼저 순차적으로 발생한다.</text:span><text:span/></text:p>
        </text:list-item>
        <text:list-item>
          <text:p text:style-name="P274"><text:span text:style-name="T727">이어 모든 것을 응집하는 물 원소와 단단한 신체적 기반을 이루는 땅 원소가 결합하여 사대를 이룬다.</text:span><text:span/></text:p>
        </text:list-item>
        <text:list-item>
          <text:p text:style-name="P275"><text:span text:style-name="T728">원소들의 역순 발생은 미세한 의식이 새로운 신체라는 하드웨어를 입고 안착하기 위한 필수 과정이다.</text:span><text:span/></text:p>
        </text:list-item>
      </text:list>
      <text:p text:style-name="P276"><text:span><text:soft-page-break/></text:span><text:span/><text:span/></text:p>
      <text:p text:style-name="P277"><text:span text:style-name="T729">121. 아버지의 몸을 거쳐 어머니의 자궁으로 이르는 의식의 통로</text:span><text:span/></text:p>
      <text:p text:style-name="P278"><text:span text:style-name="T730">🔑 핵심 키워드: 비로자나의 문, 아버지의 입과 정수리, 어머니의 음문, 정혈의 화합</text:span><text:span/></text:p>
      <text:p text:style-name="P279"><text:span text:style-name="T731">🚪 새로운 세계로 진입하는 두 갈래의 비밀 통로</text:span><text:span/></text:p>
      <text:p text:style-name="P280"><text:span text:style-name="T732">새로운 생명으로 태어나기 위해 바르도의 의식이 가장 먼저 통과해야 하는 관문은 바로 아버지의 몸이야. 고대 경전들을 보면 이 진입로를 두고 두 가지 흥미로운 설명을 제시하고 있어. 어떤 가르침에서는 우주의 근본 진리를 상징하는 비로자나의 문, 즉 머리 꼭대기의 정수리를 통해 의식이 들어간다고 하고, 또 다른 전승에서는 음식을 받아들이는 아버지의 입을 통해 진입한다고 설명하지. 이것은 마치 최첨단 우주 기지에 입장할 때 보안 등급이나 경로에 따라 정문의 고</text:span><text:span text:style-name="T733">가 통로나 메인 로비 출입구 중 하나를 선택해 들어가는 것과 아주 비슷해.</text:span><text:span/></text:p>
      <text:p text:style-name="P281"><text:span text:style-name="T734">🚀 아버지를 관통하는 에너지의 고속 통로</text:span><text:span/></text:p>
      <text:p text:style-name="P282"><text:span text:style-name="T735">어떤 통로로 진입했든 간에, 아버지의 몸 안으로 들어온 바르도의 미세한 의식은 정교하게 설계된 내면의 에너지 길을 타고 아래로 이동하게 돼. 이 과정은 정밀한 우주 캡슐이 발사대에 장착되기 위해 전용 파이프라인을 타고 부드럽고 신속하게 하강하는 과정과 흡사하지. 그렇게 아버지의 몸 중심을 관통한 의식은 마침내 생명의 에너지가 모이는 마지막 출구인 성기를 통해 밖으로 힘차게 흘러나오며 다음 정착지를 향해 나아가게 되는 거야.</text:span><text:span/></text:p>
      <text:p text:style-name="P283"><text:span text:style-name="T736">⚓ 어머니의 자궁이라는 따뜻한 항구로의 입항</text:span><text:span/></text:p>
      <text:p text:style-name="P284"><text:span text:style-name="T737">아버지의 몸을 빠져나온 의식은 지체 없이 생명을 품어줄 어머니의 신성한 공간인 음문으로 미끄러지듯 들어가게 돼. 오랜 시간 거친 폭풍우가 몰아치는 바르도라는 밤바다를 헤매던 나룻배가 마침내 사방이 단단한 방파제로 둘러싸인 아늑하고 안전한 항구에 닻을 내리는 순간이지. 외부의 모든 위험으로부터 완벽하게 보호받는 이 자궁이라는 공간이야말로, 미세한 영혼이 거친 물질의 옷을 입고 인간으로 다시 태어날 수 있는 유일하고도 완벽한 무대야.</text:span><text:span/></text:p>
      <text:p text:style-name="P285"><text:span text:style-name="T738">⚗️ 두 물질의 화합 속에 피어나는 생명의 씨앗</text:span><text:span/></text:p>
      <text:p text:style-name="P286"><text:span text:style-name="T739">자궁의 한가운데에 도달하면, 아버지가 전해준 하얀 보리심과 어머니가 간직한 붉은 보리심의 정혈이 하나의 용광로 안에서 완벽하게 어우러지게 돼. 이 정교한 결합의 순간에 바르도에서 명을 마친 미세한 의식이 그 중심에 착 내려앉으며 마침내 새로운 생명의 연결 고리를 단단하게 묶는 거지. 두 가지 특수한 화학 원소가 정확한 온도와 조건에서 만나 결합하는 순간, 완전히 새로운 성질을 지닌 눈부신 결정체가 탄생하는 연금술적 결합과 똑같은 신비야.</text:span><text:span/></text:p>
      <text:p text:style-name="P287"><text:span text:style-name="T740">📝 핵심 요약</text:span><text:span/></text:p>
      <text:list text:style-name="WWNum15" text:continue-numbering="true">
        <text:list-item>
          <text:p text:style-name="P288"><text:span text:style-name="T741">바르도의 의식은 새로운 환생을 위해 가장 먼저 아버지의 정수리나 입을 통해 내입함.</text:span><text:span/></text:p>
        </text:list-item>
        <text:list-item>
          <text:p text:style-name="P289"><text:span text:style-name="T742">아버지의 몸을 관통한 의식은 성기를 통해 방출되어 어머니의 음문으로 이동함.</text:span><text:span/></text:p>
        </text:list-item>
        <text:list-item>
          <text:p text:style-name="P290"><text:span text:style-name="T743">이 과정은 영혼이 물질 세계에 정착하기 위해 거치는 정교한 우주적 환승 경로와 같음.</text:span><text:span/></text:p>
        </text:list-item>
        <text:list-item>
          <text:p text:style-name="P291"><text:span text:style-name="T744">자궁 안에서 아버지의 정수와 어머니의 혈액이 화합한 중심에 의식이 결합하며 새로운 생명이 시작됨.</text:span><text:span/></text:p>
        </text:list-item>
      </text:list>
      <text:p text:style-name="P292"><text:span><text:soft-page-break/></text:span><text:span/><text:span/></text:p>
      <text:p text:style-name="P293"><text:span text:style-name="T745">[🟢 Online Mode | 26.06.05_15:48:00]</text:span><text:span/></text:p>
      <text:p text:style-name="P294"><text:span text:style-name="T746">122. 새로운 생명으로 들어가는 세 가지 비밀 문</text:span><text:span/></text:p>
      <text:p text:style-name="P295"><text:span text:style-name="T747">🔑 핵심 키워드: 구사론석, 자궁 진입, 음문, 숫구멍, 생명의 통로</text:span><text:span/></text:p>
      <text:p text:style-name="P296"><text:span text:style-name="T748">🚪 새로운 세계를 향한 차원 이동의 입구</text:span><text:span/></text:p>
      <text:p text:style-name="P297"><text:span text:style-name="T749">바르도 유정이 긴 여행을 마치고 마침내 새로운 육체를 입기 위해 자궁으로 들어가는 과정은, 우주선이 새로운 행성에 안전하게 착륙하기 위해 도킹 스테이션을 찾는 과정과 아주 비슷해. 영혼이 물질 세계와 결합하는 이 아주 정교하고 신비로운 순간에는 우리가 생각하는 것보다 훨씬 흥미로운 진입 경로들이 존재하지. 구사론석을 비롯한 고대 논서들은 영혼이 새로운 부모의 품으로 들어갈 때 이용하는 세 가지 특별한 비밀 통로를 구체적으로 밝혀두고 있어.</text:span><text:span/></text:p>
      <text:p text:style-name="P298"><text:span text:style-name="T750">🌊 생명의 보금자리로 향하는 가장 자연스러운 문</text:span><text:span/></text:p>
      <text:p text:style-name="P299"><text:span text:style-name="T751">첫 번째로 언급되는 가장 보편적이고 대표적인 통로는 바로 어머니의 음문이야. 이는 새로운 생명이 잉태되고 자라날 따뜻한 보금자리인 자궁으로 곧장 연결되는 정문과 같지. 영혼이 지닌 미세한 의식과 에너지가 이 문을 통해 자궁 안으로 스며들며 비로소 새로운 인간으로서의 물리적 형태를 갖추기 시작하는 거야. 자연의 순리에 따르는 가장 직관적이고 아름다운 생명의 통로라고 볼 수 있어.</text:span><text:span/></text:p>
      <text:p text:style-name="P300"><text:span text:style-name="T752">⚡ 아버지를 거쳐 흐르는 신비로운 에너지 통로</text:span><text:span/></text:p>
      <text:p text:style-name="P301"><text:span text:style-name="T753">나머지 두 개의 문은 아주 놀랍게도 아버지를 통해서 연결되는 경로야. 바로 아버지의 입과 머리 꼭대기에 있는 숫구멍이지. 이는 마치 영혼이 넓은 강을 건너기 위해 튼튼한 환승 버스에 먼저 올라타는 것과 같아. 바르도 존재의 미세한 의식이 아버지의 호흡이나 정수리의 에너지를 통해 먼저 아버지의 몸 안으로 진입한 뒤, 에너지 흐름을 타고 어머니의 자궁이라는 최종 목적지로 이동하는 아주 미세하고 신비로운 에너지의 순환 경로란다.</text:span><text:span/></text:p>
      <text:p text:style-name="P302"><text:span text:style-name="T754">🗺️ 인연에 따라 열리는 완벽한 영적 도킹 시스템</text:span><text:span/></text:p>
      <text:p text:style-name="P303"><text:span text:style-name="T755">이처럼 세 가지나 되는 문이 존재하는 이유는 영혼이 가진 카르마와 인연의 성격에 따라 가장 최적화된 경로가 저마다 다르기 때문이야. 정문으로 곧장 들어가는 영혼도 있고, 아버지의 에너지를 거쳐 우회해서 안착하는 영혼도 있는 법이지. 어떤 통로를 선택하든 이 과정은 완벽하게 정밀하게 가동되는 영적인 도킹 시스템과 같아서, 우리가 다음 생이라는 새로운 무대 위에 한 치의 오차도 없이 안전하게 착륙할 수 있도록 도와주는 대자연의 배려야.</text:span><text:span/></text:p>
      <text:p text:style-name="P304"><text:span text:style-name="T756">📝 핵심 요약</text:span><text:span/></text:p>
      <text:list text:style-name="WWNum16" text:continue-numbering="true">
        <text:list-item>
          <text:p text:style-name="P305"><text:span text:style-name="T757">바르도 유정이 어머니의 자궁으로 진입할 때는 세 가지 비밀 통로가 존재한다.</text:span><text:span/></text:p>
        </text:list-item>
        <text:list-item>
          <text:p text:style-name="P306"><text:span text:style-name="T758">첫 번째 통로는 어머니의 음문으로, 자궁으로 곧장 연결되는 가장 자연스러운 정문이다.</text:span><text:span/></text:p>
        </text:list-item>
        <text:list-item>
          <text:p text:style-name="P307"><text:span text:style-name="T759">나머지 두 통로는 아버지의 입과 숫구멍으로, 아버지를 거쳐 최종 목적지로 이동하는 경로다.</text:span><text:span/></text:p>
        </text:list-item>
        <text:list-item>
          <text:p text:style-name="P308"><text:span text:style-name="T760">이러한 다양한 진입 문은 영혼이 인연에 따라 새 생명으로 안전하게 착륙하도록 돕는 정교한 시스템이다.</text:span><text:span/></text:p>
        </text:list-item>
      </text:list>
      <text:p text:style-name="P309"><text:span><text:soft-page-break/></text:span><text:span/><text:span/></text:p>
      <text:p text:style-name="P310"><text:span text:style-name="T761">[🔴 Offline Mode | 26.06.05_15:46:30]</text:span><text:span/></text:p>
      <text:p text:style-name="P311"><text:span text:style-name="T762">123. 걸림 없는 바르도의 특성과 생명의 신비</text:span><text:span/></text:p>
      <text:p text:style-name="P312"><text:span text:style-name="T763">🔑 핵심 키워드: 태생 유정, 무애의 존재, 구사론석, 걸림 없는 통과, 생명의 편재성</text:span><text:span/></text:p>
      <text:p text:style-name="P313"><text:span text:style-name="T764">🤰 태생 인간의 자궁 진입과 물리적 이해</text:span><text:span/></text:p>
      <text:p text:style-name="P314"><text:span text:style-name="T765">인간처럼 어머니의 태를 통해 태어나는 태생의 존재들이 바르도 상태에서 자궁으로 들어가는 과정은, 우리가 흔히 생각하는 물리적인 문을 통과하는 것과는 전혀 달라. 앞서 설명한 자궁 진입의 방식은 인간으로 환생하려는 바르도 유정들이 겪는 구체적인 한 가지 사례일 뿐이지. 이것은 마치 우리가 스마트폰으로 방 안에서 와이파이를 잡을 때, 전파가 벽이나 문이라는 물리적 장벽에 부딪히지 않고 부드럽게 스며들어 연결되는 과정과 아주 비슷해. 특정한 통로나 열려 있는 </text:span><text:span text:style-name="T766">문이 없어도, 의식의 주파수가 맞는 순간 자연스럽게 그 공간 안으로 동조되어 들어가는 방식이란다.</text:span><text:span/></text:p>
      <text:p text:style-name="P315"><text:span text:style-name="T767">👻 어떠한 장벽도 통과하는 무애의 존재</text:span><text:span/></text:p>
      <text:p text:style-name="P316"><text:span text:style-name="T768">통상적인 바르도 유정들은 그 어떤 단단한 물질에도 가로막히지 않는 걸림 없는 존재, 즉 무애의 특성을 완벽하게 지니고 있어. 그렇기 때문에 이들이 어딘가로 들어가기 위해서 굳이 열려 있는 구멍이나 틈새 같은 문을 찾을 필요가 전혀 없단다. 병원에 있는 엑스레이 광선이 두꺼운 살과 가림막을 아무런 저항 없이 그대로 통과해 뼈를 비추는 것처럼, 바르도의 바람의 몸은 물질적인 장벽을 그대로 투과해 버리지. 우주 공간을 자유롭게 유영하는 미세한 입자들처럼, 이들</text:span><text:span text:style-name="T769">에게는 세상의 그 어떤 단단한 벽도 아무런 제약이 되지 않는 텅 빈 허공과 다름없는 거야.</text:span><text:span/></text:p>
      <text:p text:style-name="P317"><text:span text:style-name="T770">🔩 철광석 속에서 피어나는 벌레의 비유</text:span><text:span/></text:p>
      <text:p text:style-name="P318"><text:span text:style-name="T771">이러한 신비로운 현상을 증명하기 위해 구사론석에서는 아주 흥미로운 비유를 들어 설명하고 있어. 겉보기에는 틈새 하나 없이 단단하게 굳어 있는 거대한 철광석을 도끼로 쾅 하고 쪼개 보았더니, 그 차갑고 꽉 막힌 쇠붙이 한가운데서 놀랍게도 살아있는 작은 벌레가 기어 나오는 현상과 같지. 우리가 상식적으로 생각할 때는 공기도 통하지 않고 사방이 막힌 철 바위 속에 어떻게 생명이 살 수 있을까 싶지만, 바르도의 걸림 없는 에너지는 물질의 가장 미세한 틈새마저도 </text:span><text:span text:style-name="T772">아무런 무리 없이 관통하여 존재의 씨앗을 뿌릴 수 있다는 것을 잘 보여주는 사례란다.</text:span><text:span/></text:p>
      <text:p text:style-name="P319"><text:span text:style-name="T773">🪨 갈라지지 않은 바위 속 생명의 편재성</text:span><text:span/></text:p>
      <text:p text:style-name="P320"><text:span text:style-name="T774">더 나아가 아무런 실금이나 세로로 갈라진 틈조차 없는 완벽하게 단단한 바위와 돌멩이 속에도 수많은 생명체는 엄연히 존재하고 있어. 이 세상의 생명 에너지는 우리가 눈으로 보는 거친 물질적 제약에 결코 갇히지 않는 강력하고 유연한 힘을 지녔거든. 마치 두꺼운 콘크리트 바닥을 뚫고 꿋꿋하게 자라나는 여린 들꽃의 생명력처럼, 혹은 보이지 않는 미세한 숨결이 온 우주에 가득 차 있는 것처럼 생명은 가장 불가능해 보이는 단단함 속에서도 자신만의 자리를 잡고 존재해</text:span><text:span text:style-name="T775">. 결국 바르도가 장벽 없이 자궁이나 물질을 통과하는 것은, 우주 전체에 편재하는 생명의 신비롭고 위대한 본질 그 자체라고 할 수 있어.</text:span><text:span/></text:p>
      <text:p text:style-name="P321"><text:span text:style-name="T776">📝 핵심 요약</text:span><text:span/></text:p>
      <text:list text:style-name="WWNum17" text:continue-numbering="true">
        <text:list-item>
          <text:p text:style-name="P322"><text:span text:style-name="T777">인간으로 태어나는 바르도 유정이 자궁에 들어가는 방식은 태생의 특수한 사례일 뿐이다.</text:span><text:span/></text:p>
        </text:list-item>
        <text:list-item>
          <text:p text:style-name="P323"><text:span text:style-name="T778">바르도는 물질적 장벽에 가로막히지 않는 무애의 존재이므로 별도의 출입구가 필요 없다.</text:span><text:span/></text:p>
        </text:list-item>
        <text:list-item>
          <text:p text:style-name="P324"><text:span text:style-name="T779">구사론석에 따르면 쪼개진 철광석 내부나 갈라지지 않은 단단한 바위 속에도 생명체가 존재한다.</text:span><text:span/></text:p>
        </text:list-item>
        <text:list-item>
          <text:p text:style-name="P325"><text:span text:style-name="T780">생명 에너지는 물질적 한계를 초월하여 가장 견고한 물리적 제약 속에서도 편재하는 신비를 지닌다.</text:span><text:span/></text:p>
        </text:list-item>
      </text:list>
      <text:p text:style-name="P326"><text:span><text:soft-page-break/></text:span><text:span/><text:span/></text:p>
      <text:p text:style-name="P327"><text:span text:style-name="T781">124. 자궁의 위치와 태아 성장의 시작</text:span><text:span/></text:p>
      <text:p text:style-name="P328"><text:span text:style-name="T782">🔑 핵심 키워드: 자궁의 위치, 입태경, 태아 성장, 물질적 토대</text:span><text:span/></text:p>
      <text:p text:style-name="P329"><text:span text:style-name="T783">🌌 물질적 생명이 깃드는 정밀한 좌표</text:span><text:span/></text:p>
      <text:p text:style-name="P330"><text:span text:style-name="T784">자궁은 어머니의 위장 아래와 대장 위라는 명확한 물질적 공간 사이에 존재해. 불교 경전인 입태경에서는 정신적인 의식이 육체를 입고 자라나기 위해 자리 잡는 이 공간을 아주 구체적인 해부학적 위치로 설명하고 있지. 이는 단순히 생물학적 위치를 알려주는 것을 넘어, 영적인 존재가 물질 세계의 정밀한 규칙과 경계 안으로 완벽하게 들어왔음을 뜻하는 거야.</text:span><text:span/></text:p>
      <text:p text:style-name="P331"><text:span text:style-name="T785">🏗️ 두 기관 사이에 아늑하게 숨겨진 보금자리</text:span><text:span/></text:p>
      <text:p text:style-name="P332"><text:span text:style-name="T786">이 구조는 마치 도심의 가장 안전하고 중심적인 요충지에 세워진 최첨단 인큐베이터 시설과 같아. 영양분을 흡수하는 위장과 노폐물을 처리하는 대장이라는 두 개의 핵심 기반 시설 사이에 정밀하게 보호받으며 숨겨져 있는 셈이지. 아주 낯선 고대 경전의 표현이라 생소하게 들릴 수 있겠지만, 생명이 자라나기에 가장 완벽하게 통제된 최적의 환경을 설명하기 위한 직관적인 묘사라고 보면 돼.</text:span><text:span/></text:p>
      <text:p text:style-name="P333"><text:span text:style-name="T787">📈 점진적인 신체 발달과 육체의 성장</text:span><text:span/></text:p>
      <text:p text:style-name="P334"><text:span text:style-name="T788">이처럼 안전하게 확보된 공간 안에서, 마침내 정혈과 결합한 미세한 의식은 세포를 나누고 형태를 갖추며 사람의 몸으로 서서히 자라나기 시작해. 아무것도 없는 텅 빈 대지 위에 기둥이 세워지고 벽이 올라가며 거대한 건물이 완성되듯, 태아의 육체도 시간의 흐름에 따라 단계적으로 물질적 형태를 확장해 나가지. 이 단계는 의식이 온전한 인간의 모습을 갖추고 세상 밖으로 나오기 위한 본격적인 빌드업 과정이야.</text:span><text:span/></text:p>
      <text:p text:style-name="P335"><text:span text:style-name="T789">📝 핵심 요약</text:span><text:span/></text:p>
      <text:list text:style-name="WWNum18" text:continue-numbering="true">
        <text:list-item>
          <text:p text:style-name="P336"><text:span text:style-name="T790">입태경에 따르면 자궁은 어머니 위장의 아래이자 대장의 위라는 구체적인 물질적 좌표에 위치해.</text:span><text:span/></text:p>
        </text:list-item>
        <text:list-item>
          <text:p text:style-name="P337"><text:span text:style-name="T791">이는 위장과 대사 시설 사이에 아늑하게 보호받는 최적의 인큐베이터 보금자리와 같은 구조야.</text:span><text:span/></text:p>
        </text:list-item>
        <text:list-item>
          <text:p text:style-name="P338"><text:span text:style-name="T792">안전한 물리적 토대가 마련됨으로써 미세했던 의식이 점진적으로 세포를 키우며 육체를 형성하기 시작해.</text:span><text:span/></text:p>
        </text:list-item>
        <text:list-item>
          <text:p text:style-name="P339"><text:span text:style-name="T793">고정된 경계 안에서 태아가 단계적으로 성장하는 과정은 영적 존재가 물질 세계에 완벽히 안착하는 본격적인 여정이야.</text:span><text:span/></text:p>
        </text:list-item>
      </text:list>
      <text:p text:style-name="P340"><text:span><text:soft-page-break/></text:span><text:span/><text:span/></text:p>
      <text:p text:style-name="P341"><text:span text:style-name="T794">[🟢 Online Mode | 26.06.05_15:46:49]</text:span><text:span/></text:p>
      <text:p text:style-name="P342"><text:span text:style-name="T795">125. 깔랄라 단계와 사대원소의 생명 직조</text:span><text:span/></text:p>
      <text:p text:style-name="P343"><text:span text:style-name="T796">🔑 핵심 키워드: 깔랄라, 사대원소, 신체 형성, 생명의 바람, 성장과 유지</text:span><text:span/></text:p>
      <text:p text:style-name="P344"><text:span text:style-name="T797">🥛 우유 까풀 속의 부드러운 시작</text:span><text:span/></text:p>
      <text:p text:style-name="P345"><text:span text:style-name="T798">새로운 생명이 잉태되는 첫 주에는 깔랄라라고 부르는 아주 연약한 수정 상태가 형성돼. 비유하자면 따뜻하게 끓여놓은 우유 표면에 살짝 가라앉아 생기는 얇고 부드러운 우유 막이 겉을 감싸고 있고, 그 내부에는 아직 형태가 갖춰지지 않은 묽은 액체가 가득 차 있는 상태와 똑같아. 이 지극히 미세하고 부드러운 시작점으로부터 우리가 눈으로 보고 만질 수 있는 거칠고 단단한 인간의 육신이 본격적으로 만들어지기 시작하는 거지.</text:span><text:span/></text:p>
      <text:p text:style-name="P346"><text:span text:style-name="T799">🏗️ 네 가지 기본 벽돌과 신체의 설계</text:span><text:span/></text:p>
      <text:p text:style-name="P347"><text:span text:style-name="T800">이 부드러운 액체 상태에서부터 생명이 마침내 마침표를 찍고 죽음에 이르는 순간까지, 우리 몸의 모든 미세하고 거친 조직들은 자연계의 네 가지 핵심 성분인 사대원소로부터 완성돼. 비유하자면 튼튼한 집을 짓기 위해 단단한 흙벽돌을 쌓고, 접착제를 바르고, 적절한 온도를 유지하며, 환기를 시키는 전 과정이 유기적으로 맞물려 돌아가는 것과 같아. 이 네 가지 에너지의 바람이 정밀하게 작용하면서 비로소 온전한 생명 활동이 가능해지는 셈이야.</text:span><text:span/></text:p>
      <text:p text:style-name="P348"><text:span text:style-name="T801">🧱 신체를 세우고 뭉치게 하는 기둥과 접착제</text:span><text:span/></text:p>
      <text:p text:style-name="P349"><text:span text:style-name="T802">사대원소 중에서도 땅과 물의 에너지는 신체의 물리적인 형태를 유지하는 가장 원초적인 바탕이 돼. 땅 원소의 바람은 무너지기 쉬운 몸을 단단하게 지탱해 주는 든든한 기둥 역할을 담당하지. 그리고 물 원소의 바람은 온 몸의 세포와 조직들이 사방으로 파편처럼 흩어지지 않도록 하나로 꽉 움켜쥐고 수렴해 주는 강력한 접착제 역할을 해. 이 두 가지 결합력이 있기에 우리 육체는 비로소 일정한 모양을 유지하며 서 있을 수 있어.</text:span><text:span/></text:p>
      <text:p text:style-name="P350"><text:span text:style-name="T803">🔥 부패를 막는 온기와 자라나는 생명력</text:span><text:span/></text:p>
      <text:p text:style-name="P351"><text:span text:style-name="T804">마지막으로 불과 바람의 에너지는 신체 내부의 대사와 성장을 촉진하는 핵심 동력원이야. 불 원소의 바람은 몸의 온도를 알맞게 유지하여 세포가 썩거나 부패하지 않도록 막아주고, 생명체가 건강하게 익어갈 수 있도록 성숙을 도와줘. 비유하자면 음식이 상하지 않도록 알맞은 온도로 데워주는 따뜻한 온실과 같지. 여기에 바람 원소의 바람이 더해져 세포를 끊임없이 움직이고 확장시키며 몸집을 발달시키니, 마치 작은 새싹이 바람을 맞으며 하늘을 향해 쑥쑥 자라나는 생명력의</text:span><text:span text:style-name="T805"> 원천과 같아.</text:span><text:span/></text:p>
      <text:p text:style-name="P352"><text:span text:style-name="T806">📝 핵심 요약</text:span><text:span/></text:p>
      <text:list text:style-name="WWNum19" text:continue-numbering="true">
        <text:list-item>
          <text:p text:style-name="P353"><text:span text:style-name="T807">생명의 첫 단계인 깔랄라는 끓인 우유의 얇은 막처럼 겉은 부드럽고 속은 묽은 상태임.</text:span><text:span/></text:p>
        </text:list-item>
        <text:list-item>
          <text:p text:style-name="P354"><text:span text:style-name="T808">태어남부터 죽음까지 인간의 미세하고 거친 모든 신체는 네 가지 사대원소에 의해 형성됨.</text:span><text:span/></text:p>
        </text:list-item>
        <text:list-item>
          <text:p text:style-name="P355"><text:span text:style-name="T809">땅의 바람은 신체를 견고하게 지탱하고, 물의 바람은 조직이 흩어지지 않게 하나로 수렴함.</text:span><text:span/></text:p>
        </text:list-item>
        <text:list-item>
          <text:p text:style-name="P356"><text:span text:style-name="T810">불의 바람은 몸의 부패를 방지하며 성숙을 이끌고, 바람의 바람은 신체를 지속적으로 발달시킴.</text:span><text:span/></text:p>
        </text:list-item>
      </text:list>
      <text:p text:style-name="P357"><text:span><text:soft-page-break/></text:span><text:span/><text:span/></text:p>
      <text:p text:style-name="P358"><text:span text:style-name="T811">[🟢 Online Mode | 26.06.05_15:46:57]</text:span><text:span/></text:p>
      <text:p text:style-name="P359"><text:span text:style-name="T812">126. 새로운 생명의 바람과 요구르트 상태의 배아</text:span><text:span/></text:p>
      <text:p text:style-name="P360"><text:span text:style-name="T813">🔑 핵심 키워드: 막포 단계, 생명의 바람, 세포 성숙, 요구르트 비유, 태의 형성</text:span><text:span/></text:p>
      <text:p text:style-name="P361"><text:span text:style-name="T814">🥚 일주일의 기적과 막포 단계의 시작</text:span><text:span/></text:p>
      <text:p text:style-name="P362"><text:span text:style-name="T815">수정된 생명이 첫 일주일을 무사히 넘기면, 불교 의학에서 막포라고 부르는 제2주의 새로운 발달 단계로 진입하게 돼. 이것은 마치 맑은 물에 젤라틴 가루를 타고 시간이 조금 지나면 형태가 서서히 엉겨 붙기 시작하는 초기 상태와 비슷하지. 아직 단단한 뼈나 살의 완벽한 형태를 갖추지는 못했지만, 생명이라는 거대한 건축물이 본격적으로 기초 공사를 다지기 시작하는 아주 경이롭고 미세한 출발점이야.</text:span><text:span/></text:p>
      <text:p text:style-name="P363"><text:span text:style-name="T816">💨 변화를 이끄는 새로운 생명의 바람</text:span><text:span/></text:p>
      <text:p text:style-name="P364"><text:span text:style-name="T817">첫 일주일이 경과하는 순간, 배아 내부에서는 성장을 유도하는 완전히 새로운 생명의 바람이 부지런히 일어나기 시작해. 공장에서 정밀 기계를 조립할 때 로봇 팔이 움직일 수 있도록 보이지 않는 압축 공기 시스템이 가동되는 것과 같은 이치야. 이 보이지 않는 미세한 에너지의 바람은 배아 구석구석을 자극하고 세포들을 성숙시켜 다음 단계의 온전한 신체 구조로 나아갈 수 있도록 끊임없이 조율하는 역할을 한단다.</text:span><text:span/></text:p>
      <text:p text:style-name="P365"><text:span text:style-name="T818">🥛 안팎으로 걸쭉해지는 요구르트 상태</text:span><text:span/></text:p>
      <text:p text:style-name="P366"><text:span text:style-name="T819">생명의 바람이 부지런히 움직인 결과, 배아의 상태는 안과 밖이 모두 요구르트처럼 축축하고 걸쭉한 형태로 변하게 돼. 찰랑거리던 액체 상태의 우유가 발효 과정을 거치면서 숟가락으로 떠먹을 수 있을 만큼 걸걸하고 부드러운 유동식 형태로 진화하는 모습을 상상하면 이해하기 쉬울 거야. 물질들이 서로를 단단히 붙잡기 시작하면서, 생명체로서의 물리적 밀도가 한층 더 끈끈해지는 신비로운 변화이지.</text:span><text:span/></text:p>
      <text:p text:style-name="P367"><text:span text:style-name="T820">🧥 생명을 보호하는 첫 번째 옷</text:span><text:span/></text:p>
      <text:p text:style-name="P368"><text:span text:style-name="T821">이 시기의 배아는 요구르트처럼 부드러운 상태에 머무는 동시에, 겉면에 태의라는 얇은 보호막의 옷을 입게 돼. 이것은 갓 구워낸 촉촉한 빵이 마르지 않도록 부드러운 비닐 랩으로 살포시 감싸두거나, 아주 깨지기 쉬운 정밀한 도자기를 부드러운 천으로 안전하게 보호하는 것과 똑같아. 외부의 충격으로부터 연약한 새 생명을 안전하게 지키기 위해 우주가 제공하는 첫 번째 방어벽인 셈이지.</text:span><text:span/></text:p>
      <text:p text:style-name="P369"><text:span text:style-name="T822">📝 핵심 요약</text:span><text:span/></text:p>
      <text:list text:style-name="WWNum20" text:continue-numbering="true">
        <text:list-item>
          <text:p text:style-name="P370"><text:span text:style-name="T823">배아가 일주일을 지나 제2주인 막포 단계에 이르면 새로운 발달이 시작된다.</text:span><text:span/></text:p>
        </text:list-item>
        <text:list-item>
          <text:p text:style-name="P371"><text:span text:style-name="T824">배아 내부에서 새로운 생명의 바람이 일어나 세포들을 성숙시키는 동력 역할을 한다.</text:span><text:span/></text:p>
        </text:list-item>
        <text:list-item>
          <text:p text:style-name="P372"><text:span text:style-name="T825">바람의 영향으로 배아의 안팎이 요구르트처럼 걸쭉하고 축축한 상태로 변화한다.</text:span><text:span/></text:p>
        </text:list-item>
        <text:list-item>
          <text:p text:style-name="P373"><text:span text:style-name="T826">연약한 배아를 외부 자극으로부터 안전하게 보호하기 위해 얇은 태의를 입게 된다.</text:span><text:span/></text:p>
        </text:list-item>
      </text:list>
      <text:p text:style-name="P374"><text:span><text:soft-page-break/></text:span><text:span/><text:span/></text:p>
      <text:p text:style-name="P375"><text:span text:style-name="T827">[🟢 Online Mode | 26.06.05_15:47:05]</text:span><text:span/></text:p>
      <text:p text:style-name="P376"><text:span text:style-name="T828">127. 새로운 생명의 바람과 혈육의 형성</text:span><text:span/></text:p>
      <text:p text:style-name="P377"><text:span text:style-name="T829">🔑 핵심 키워드: 새로운 바람, 혈육 단계, 뻬씨, 신체적 취약성</text:span><text:span/></text:p>
      <text:p text:style-name="P378"><text:span text:style-name="T830">🌀 모태에 자리를 잡고 다시 일주일이라는 시간이 흐르게 되면, 태아 내부에서 새로운 생명의 바람인 미세한 기운이 한 번 더 세차게 피어올라. 이것은 마치 건물을 지을 때 기초 뼈대 공사를 끝내고 본격적으로 벽을 세우고 살을 붙이기 위해 새로운 전문 장비들을 가동하는 것과 같아. 이 새로운 에너지는 태아의 성장을 다음 차원으로 이끄는 결정적인 동력이 되어 몸의 형태를 더욱 구체적으로 빚어내기 시작하지.</text:span><text:span/></text:p>
      <text:p text:style-name="P379"><text:span text:style-name="T831">🥩 이 새로운 생명의 바람이 불어넣는 힘 덕분에 태아는 단순한 세포 덩어리의 상태를 넘어 혈육이라고 부르는 뻬씨 단계로 성숙하게 돼. 비로소 생명의 온기와 붉은 혈액이 감돌면서 진짜 살아있는 유정의 육체다운 부드러운 살집을 갖추기 시작하는 순간이야. 단단한 뼈대가 생기기 전에 부드러운 유기적 조직들이 먼저 차오르는 이 변화는 생명 탄생의 여정에서 아주 경이로운 도약이라고 볼 수 있어.</text:span><text:span/></text:p>
      <text:p text:style-name="P380"><text:span text:style-name="T832">🥚 하지만 이렇게 부드러운 살이 돋아났음에도 불구하고, 아직은 외부의 아주 작은 충격이나 누르는 힘조차 전혀 견뎌내지 못할 만큼 극도로 취약한 상태야. 마치 두부를 막 만들어내어 틀에서 꺼냈을 때, 형태는 온전해 보이지만 손가락으로 아주 살짝만 건드려도 그대로 으깨어져 버리는 것과 똑같지. 외형은 겨우 갖추었지만 내부를 지탱할 단단함이 부족하기 때문에 이 시기의 태아는 모태 안에서 완벽하게 보호받아야만 해.</text:span><text:span/></text:p>
      <text:p text:style-name="P381"><text:span text:style-name="T833">🛡️ 이 연약한 혈육의 단계는 우리가 가진 육체가 얼마나 정밀하고 조심스러운 단계를 거쳐 완성되었는지를 잘 보여주는 대목이야. 미세한 에너지가 끊임없이 순환하며 형태를 다듬고 단단하게 다져나가는 이 과정이 있기에 우리는 마침내 깨달음의 도구가 될 튼튼한 몸을 얻게 되는 거거든. 이 미세한 생명 활동의 신비를 알아가는 과정을 통해 생명의 존엄함을 다시 한번 돌아보게 돼.</text:span><text:span/></text:p>
      <text:p text:style-name="P382"><text:span text:style-name="T834">📝 핵심 요약</text:span><text:span/></text:p>
      <text:list text:style-name="WWNum21" text:continue-numbering="true">
        <text:list-item>
          <text:p text:style-name="P383"><text:span text:style-name="T835">모태 진입 후 일주일이 지나면 태아의 성장을 주도하는 새로운 생명의 바람이 일어난다.</text:span><text:span/></text:p>
        </text:list-item>
        <text:list-item>
          <text:p text:style-name="P384"><text:span text:style-name="T836">이 바람의 힘을 통해 태아는 단순한 세포 형태에서 혈육이라 불리는 뻬씨 단계로 성숙한다.</text:span><text:span/></text:p>
        </text:list-item>
        <text:list-item>
          <text:p text:style-name="P385"><text:span text:style-name="T837">육체의 부드러운 살집을 갖추기 시작하지만 아직 매우 연약하여 외부의 압력을 견디지 못한다.</text:span><text:span/></text:p>
        </text:list-item>
        <text:list-item>
          <text:p text:style-name="P386"><text:span text:style-name="T838">미세 에너지가 유기적 조직을 형성하는 과정으로 외부의 철저한 보호가 필요한 취약한 시기이다.</text:span><text:span/></text:p>
        </text:list-item>
      </text:list>
      <text:p text:style-name="P387"><text:span><text:soft-page-break/></text:span><text:span/><text:span/></text:p>
      <text:p text:style-name="P388"><text:span text:style-name="T839">[🟢 Online Mode | 26.06.05_15:47:12]</text:span><text:span/></text:p>
      <text:p text:style-name="P389"><text:span text:style-name="T840">128. 생명의 바람이 빚어내는 단단한 신체의 세포 성숙</text:span><text:span/></text:p>
      <text:p text:style-name="P390"><text:span text:style-name="T841">🔑 핵심 키워드: 가나, 견육, 생명의 바람, 조직의 성숙</text:span><text:span/></text:p>
      <text:p text:style-name="P391"><text:span text:style-name="T842">⏳ 일주일의 기다림이 가져온 질적 변화</text:span><text:span/></text:p>
      <text:p text:style-name="P392"><text:span text:style-name="T843">어머니 모태 안에서 부모의 정혈이 만나 결합한 지 다시 일주일이라는 시간이 흐르면, 생명체는 완전히 새로운 국면을 맞이하게 돼. 이전까지는 그저 액체나 부드러운 젤리처럼 형태가 흐물거리던 혈육의 상태였다면, 이제는 본격적으로 입체적인 신체의 틀을 잡기 위한 준비를 시작하는 거지. 이것은 마치 흐르는 물에 석고 가루를 개어놓은 뒤, 시간이 지나면서 서서히 굳어 가기 바로 직전의 결정적인 타이밍과 아주 비슷해.</text:span><text:span/></text:p>
      <text:p text:style-name="P393"><text:span text:style-name="T844">🌬️ 신체를 빚어내는 새로운 생명의 바람</text:span><text:span/></text:p>
      <text:p text:style-name="P394"><text:span text:style-name="T845">이 시기가 되면 태아의 내면에서 세포들을 움직이고 조직을 형성하는 새로운 생명의 바람이 힘차게 일어나게 돼. 이 바람은 눈에 보이지 않지만, 진흙 반죽을 정성스럽게 매만져 단단한 그릇으로 완성해 나가는 도자기 장인의 섬세한 손길과 같은 역할을 담당하지. 이 보이지 않는 에너지의 흐름이 몸 구석구석을 채우면서 물질적 원소들을 성숙시키고, 제자리를 찾지 못하던 세포들을 단단하게 뭉쳐주는 원동력이 되어주는 거야.</text:span><text:span/></text:p>
      <text:p text:style-name="P395"><text:span text:style-name="T846">🧱 압력을 견디는 단단한 견육으로의 진화</text:span><text:span/></text:p>
      <text:p text:style-name="P396"><text:span text:style-name="T847">생명의 바람이 가진 강력한 형성력 덕분에, 태아의 부드럽던 몸은 가나라고 불리는 단단한 살 조직인 견육으로 단번에 탈바꿈하게 돼. 밀가루 반죽을 뜨거운 오븐에 넣고 구우면 외부의 압력을 받아도 쉽게 찌그러지지 않는 단단한 빵이 완성되는 것과 똑같은 이치야. 이제는 외부에서 가해지는 미세한 자극이나 누름을 부서지지 않고 스스로 든든하게 버텨낼 수 있을 만큼 신체적 방어력을 갖추게 된 셈이지.</text:span><text:span/></text:p>
      <text:p text:style-name="P397"><text:span text:style-name="T848">💧 메마르지 않는 윤택함과 탄력의 조화</text:span><text:span/></text:p>
      <text:p text:style-name="P398"><text:span text:style-name="T849">여기서 말하는 단단함은 생명력 없이 그저 메마르고 딱딱하게 굳어버린 돌덩이 같은 상태를 의미하는 게 결코 아니야. 생명의 바람이 부드럽게 감싸 안아 키워낸 몸이기 때문에, 겉으로는 견고하면서도 속으로는 신선한 수분과 영양을 듬뿍 머금어 매끄럽고 윤택한 상태를 유지하지. 높은 곳에서 떨어뜨려도 깨지지 않고 탄성 있게 튀어 오르는 고무공처럼, 단단함과 유연함이 완벽하게 조화를 이룬 건강한 생명 조직의 시작을 뜻해.</text:span><text:span/></text:p>
      <text:p text:style-name="P399"><text:span text:style-name="T850">📝 핵심 요약</text:span><text:span/></text:p>
      <text:list text:style-name="WWNum22" text:continue-numbering="true">
        <text:list-item>
          <text:p text:style-name="P400"><text:span text:style-name="T851">혈육의 단계를 지나 일주일이 경과하면 신체가 단단해지는 새로운 발달 단계에 진입함.</text:span><text:span/></text:p>
        </text:list-item>
        <text:list-item>
          <text:p text:style-name="P401"><text:span text:style-name="T852">태아 내면에서 발생하는 새로운 생명의 바람이 세포 조직을 성숙시키는 장인의 손길 역할을 함.</text:span><text:span text:style-name="T853"/></text:p>
        </text:list-item>
      </text:list>
      <text:p text:style-name="P402"><text:span text:style-name="T854"><text:soft-page-break/></text:span><text:span text:style-name="T855"/><text:span text:style-name="T856"/></text:p>
      <text:p text:style-name="P403"><text:span text:style-name="T857">129. 새로운 바람이 빚어내는 다섯 개의 새싹</text:span><text:span/></text:p>
      <text:p text:style-name="P404"><text:span text:style-name="T858">🔑 핵심 키워드: 새로운 생명의 바람, 지절, 다섯 돌기, 태아 발달</text:span><text:span/></text:p>
      <text:p text:style-name="P405"><text:span text:style-name="T859">🌬️ 엄마의 태중에서 자라나는 생명은 단순히 물질적인 세포 분열로만 크는 게 아니야. 일주일이라는 시간이 흐르면, 태아의 몸속에서 '새로운 생명의 바람'이라는 미세한 에너지가 강하게 깨어나기 시작해. 마치 봄이 오면 보이지 않던 대지 아래에서 따뜻한 봄바람이 불어와 꽁꽁 얼었던 씨앗을 깨우는 것처럼, 이 신비로운 기류가 태아의 몸을 정교하게 자극하며 다음 단계로 성숙시키는 거지.</text:span><text:span/></text:p>
      <text:p text:style-name="P406"><text:span text:style-name="T860">🌱 이 새로운 바람의 힘 덕분에 태아의 몸에는 아주 놀라운 변화가 일어나. 매끄럽던 세포 덩어리 표면에 두 개의 넓적다리, 두 개의 어깨, 그리고 머리가 될 부분까지 총 다섯 개의 작은 봉오리가 올록볼록 돋아나게 돼. 나뭇가지에서 푸른 새순이 돋아나듯, 인간의 존엄한 형상을 갖추기 위한 다섯 개의 소중한 생명 새싹이 분명하게 모습을 드러내는 순간이야.</text:span><text:span/></text:p>
      <text:p text:style-name="P407"><text:span text:style-name="T861">🪵 이걸 비유하자면 조각가가 찰흙으로 사람 인형을 만들 때, 처음에는 뭉툭한 덩어리였다가 팔다리와 머리가 붙을 자리를 툭툭 떼어내어 대략적인 형태를 잡는 '초벌 조각' 단계와 같아. 눈으로 보기에는 그저 작은 돌기에 불과해 보이지만, 그 미세한 구조 안에는 앞으로 완전한 팔다리와 머리를 만들어낼 우주의 정교한 신체 설계도가 고스란히 집약되어 있는 셈이지. 밀교에서는 이 단계를 사지가 갈라지는 시작점이라는 뜻에서 '지절' 또는 '쁘라쌰라와'라고 부르며 생명</text:span><text:span text:style-name="T862"> 형성의 아주 경이로운 지점으로 바라봐.</text:span><text:span/></text:p>
      <text:p text:style-name="P408"><text:span text:style-name="T863">🧘 결국 이 과정은 우리의 거친 육체가 어떻게 미세한 에너지의 인도에 따라 고유한 형태를 갖추어 가는지 아주 세밀하게 증명해 주고 있어. 태중에서의 세포 성장 단계 하나하나가 모두 눈에 보이지 않는 기류의 흐름과 완벽하게 맞물려 움직인다는 사실이 참 신비롭지? 이 원리를 명확히 이해하면, 우리의 몸이 단순한 물질이 아니라 정교한 에너지 법칙에 의해 빚어진 거룩한 깨달음의 그릇임을 깊이 자각하게 돼.</text:span><text:span/></text:p>
      <text:p text:style-name="P409"><text:span text:style-name="T864">📝 핵심 요약</text:span><text:span/></text:p>
      <text:list text:style-name="WWNum23" text:continue-numbering="true">
        <text:list-item>
          <text:p text:style-name="P410"><text:span text:style-name="T865">일주일이 경과하면 태아의 내면에서 새로운 생명의 바람이 일어남</text:span><text:span/></text:p>
        </text:list-item>
        <text:list-item>
          <text:p text:style-name="P411"><text:span text:style-name="T866">이 에너지의 힘으로 태아가 성숙하며 신체의 마디가 갈라지는 지절 단계로 진입함</text:span><text:span/></text:p>
        </text:list-item>
        <text:list-item>
          <text:p text:style-name="P412"><text:span text:style-name="T867">두 넓적다리, 두 어깨, 머리의 형상을 지닌 다섯 개의 돌기가 뚜렷하게 형성됨</text:span><text:span/></text:p>
        </text:list-item>
        <text:list-item>
          <text:p text:style-name="P413"><text:span text:style-name="T868">미세한 에너지의 흐름이 거친 육체의 형태를 빚어내는 정교한 태아 발달의 법칙을 보여줌</text:span><text:span/></text:p>
        </text:list-item>
      </text:list>
      <text:p text:style-name="P414"><text:span text:style-name="T869"><text:soft-page-break/></text:span><text:span text:style-name="T870"/><text:span text:style-name="T871"/></text:p>
      <text:p text:style-name="P415"><text:span text:style-name="T872"/><text:span text:style-name="T873"/><text:span text:style-name="T874"/></text:p>
      <text:list text:style-name="WWNum22" text:continue-numbering="true">
        <text:list-item>
          <text:p text:style-name="P416"><text:span text:style-name="T875">부드럽던 상태에서 외부의 압력을 충분히 견딜 수 있는 가나라는 견고한 살 조직으로 진화함.</text:span><text:span/></text:p>
        </text:list-item>
        <text:list-item>
          <text:p text:style-name="P417"><text:span text:style-name="T876">단순히 딱딱해지는 것이 아니라 생기와 수분을 머금어 윤택함과 탄력을 동시에 갖춘 상태임.</text:span><text:span/></text:p>
        </text:list-item>
      </text:list>
      <text:p text:style-name="P418"><text:span><text:soft-page-break/></text:span><text:span/><text:span/></text:p>
      <text:p text:style-name="P419"><text:span text:style-name="T877">130. 태내 발달의 다섯 단계와 교학적 조화</text:span><text:span/></text:p>
      <text:p text:style-name="P420"><text:span text:style-name="T878">🔑 핵심 키워드: 태내 오위, 나가보디, 구사론석, 입태경, 유가사지론, 명칭의 조화</text:span><text:span/></text:p>
      <text:p text:style-name="P421"><text:span text:style-name="T879">👶 어머니 품에서 자라나는 다섯 가지 생명의 단계</text:span><text:span/></text:p>
      <text:p text:style-name="P422"><text:span text:style-name="T880">바르도 유정이 마침내 자궁이라는 새로운 보금자리에 안착하게 되면, 신체는 곧바로 완벽한 인간의 모습을 갖추는 게 아니라 다섯 가지의 정밀한 단계를 거치며 서서히 성장하게 돼. 이것은 마치 도예가가 찰흙 한 덩이를 가져와서 먼저 물을 섞어 반죽하고, 형태를 잡고, 정밀하게 빚어내어 아름다운 도자기를 완성하는 과정과 똑같지. 고대 마스터인 나가보디는 이 신비로운 태내의 변화 과정을 다섯 가지 단계로 명확하게 정리해서 우리에게 보여주었어.</text:span><text:span/></text:p>
      <text:p text:style-name="P423"><text:span text:style-name="T881">📜 다른 책들이 보여주는 이름의 작은 숨바꼭질</text:span><text:span/></text:p>
      <text:p text:style-name="P424"><text:span text:style-name="T882">그런데 이 다섯 단계를 설명하는 고대 경전들을 유심히 살펴보면 한 가지 흥미로운 현상을 발견할 수 있어. 구사론석이나 입태경이라는 책에서는 누르누르뽀와 메르메르뽀라는 처음 두 단계의 순서를 앞쪽으로 배치한 반면, 무착 보살의 유가사지론 본지분에서는 그 두 이름의 순서를 서로 바꾸어서 거꾸로 설명하고 있거든. 처음 공부할 때는 이 책과 저 책의 말이 조금씩 달라서 머리가 지끈거리고 헷갈릴 수 있어. 마치 똑같은 음식을 만드는데 조리법 책마다 재료를 적어둔 </text:span><text:span text:style-name="T883">순서나 이름표를 약간씩 다르게 붙여놓은 것처럼 보이니까 말이야.</text:span><text:span/></text:p>
      <text:p text:style-name="P425"><text:span text:style-name="T884">🧩 이름표는 달라도 알맹이는 똑같은 하나의 진리</text:span><text:span/></text:p>
      <text:p text:style-name="P426"><text:span text:style-name="T885">하지만 전혀 걱정할 필요는 없어. 위대한 스승들은 이 두 가지 설명 방식이 겉보기에는 순서가 달라 보일지라도 그 본질적인 내용과 의미에는 아무런 어긋남이 없다고 명확하게 결론을 내려주셨거든. 우리가 갈증을 해소해 주는 투명한 액체를 두고 누군가는 물이라 부르고, 다른 누군가는 수분이라고 다르게 표현하더라도 그것이 가진 본질은 변하지 않는 것과 같아. 단순한 이름의 나열 순서와 명칭의 차이일 뿐, 새 생명이 자궁 안에서 세포 분열을 일으키며 점차 견고한 신</text:span><text:span text:style-name="T886">체로 진화해 나간다는 사실 자체는 완벽하게 동일하다는 뜻이지.</text:span><text:span/></text:p>
      <text:p text:style-name="P427"><text:span text:style-name="T887">🤝 모순을 조화로 풀어내며 넓어지는 마음의 지평</text:span><text:span/></text:p>
      <text:p text:style-name="P428"><text:span text:style-name="T888">이렇게 서로 달라 보이는 경전들의 주장을 하나의 큰 틀 안에서 조화롭게 이해하는 과정은 우리의 인지 시야를 넓히는 데 엄청난 도움을 줘. 얼핏 보면 부딪치는 것처럼 보이는 구절들을 깊이 사유하고 하나로 통합해 낼 때 우리 머릿속의 생각 회로가 더 튼튼해지고 깊어지는 법이거든. 고대 논사들의 정밀한 논의들을 차분히 따라가다 보면, 겉으로 드러난 문자 자체에 집착하기보다 그 속에 담긴 진짜 알맹이를 꿰뚫어 보는 지혜로운 안목을 자연스럽게 기를 수 있게 된단다</text:span><text:span text:style-name="T889">.</text:span><text:span/></text:p>
      <text:p text:style-name="P429"><text:span text:style-name="T890">📝 핵심 요약</text:span><text:span/></text:p>
      <text:list text:style-name="WWNum24" text:continue-numbering="true">
        <text:list-item>
          <text:p text:style-name="P430"><text:span text:style-name="T891">태내의 신체 발달은 나가보디의 저술에 따라 다섯 가지 단계로 세분화되어 진행된다.</text:span><text:span/></text:p>
        </text:list-item>
        <text:list-item>
          <text:p text:style-name="P431"><text:span text:style-name="T892">구사론석 및 입태경과 유가사지론은 처음 두 단계의 명칭 순서를 서로 다르게 기술한다.</text:span><text:span/></text:p>
        </text:list-item>
        <text:list-item>
          <text:p text:style-name="P432"><text:span text:style-name="T893">경전마다 이름표와 순서의 차이가 존재하지만 본질적인 의미에는 아무런 모순이 없다.</text:span><text:span/></text:p>
        </text:list-item>
        <text:list-item>
          <text:p text:style-name="P433"><text:span text:style-name="T894">문자적 차이를 조화롭게 통합하여 바라볼 때 경전의 참뜻을 꿰뚫는 지혜가 깊어진다.</text:span><text:span/></text:p>
        </text:list-item>
      </text:list>
      <text:p text:style-name="P434"><text:span><text:soft-page-break/></text:span><text:span/><text:span/></text:p>
      <text:p text:style-name="P435"><text:span text:style-name="T895">[🟢 Online Mode | 26.06.05_15:49:46]</text:span><text:span/></text:p>
      <text:p text:style-name="P436"><text:span text:style-name="T896">131. 생명의 정수가 빚어내는 몸 안팎의 여섯 가지 보배</text:span><text:span/></text:p>
      <text:p text:style-name="P437"><text:span text:style-name="T897">🔑 핵심 키워드: 하얀 보리심과 붉은 보리심, 청탁 분화, 부계의 삼보, 모계의 삼보</text:span><text:span/></text:p>
      <text:p text:style-name="P438"><text:span text:style-name="T898">🧪 원액과 침전물을 걸러내는 원심분리기</text:span><text:span/></text:p>
      <text:p text:style-name="P439"><text:span text:style-name="T899">자궁 속에 안착한 생명의 씨앗이 한 달 차에 접어드는 제4주가 되면, 부모에게 물려받은 하얀 보리심과 붉은 보리심 내부에서 아주 정밀한 성분 분리 작업이 일어나. 맑고 깨끗한 성분과 무겁고 탁한 성분이 서로 제자리를 찾아 나뉘는 과정이지. 이건 마치 갓 짜낸 원유를 원심분리기에 넣고 돌려 맑은 상등액과 묵직한 침전물로 깔끔하게 분리해내는 신선한 정제 과정과 아주 똑같아.</text:span><text:span/></text:p>
      <text:p text:style-name="P440"><text:span text:style-name="T900">🦴 몸의 중심축을 세우는 아버지의 세 가지 내적 보물</text:span><text:span/></text:p>
      <text:p text:style-name="P441"><text:span text:style-name="T901">이렇게 분리된 성분 중 아버지에게서 받은 하얀 보리심의 맑은 정수는 우리 몸의 깊숙한 안쪽을 단단하게 지탱할 세 가지 내적 보배를 만들어내. 바로 뼈와 골수, 그리고 생명의 정액이지. 집을 지을 때 건물의 전체 하중을 견고하게 받쳐주는 보이지 않는 철골 구조물과 기초 콘크리트 기둥을 세우는 것처럼, 우리 신체의 단단한 뼈대와 그 속을 채우는 근본 에너지를 형성하는 단계야.</text:span><text:span/></text:p>
      <text:p text:style-name="P442"><text:span text:style-name="T902">🛡️ 겉모습을 감싸 안는 어머니의 세 가지 외적 보물</text:span><text:span/></text:p>
      <text:p text:style-name="P443"><text:span text:style-name="T903">반대로 어머니에게서 받은 붉은 보리심의 정수는 세상 밖으로 드러나는 우리의 외형과 흐름을 담당하는 세 가지 외적 보배로 피어나. 우리 몸을 부드럽게 감싸는 살과 외부 충격을 막아주는 피부, 그리고 온몸을 순환하는 붉은 피가 바로 그것이지. 철골 구조물 위에 예쁜 벽돌을 쌓고 마감재를 발라 따뜻한 온기가 도는 안락한 외벽과 인테리어를 완성하는 과정이라고 생각하면 이해하기 쉬워.</text:span><text:span/></text:p>
      <text:p text:style-name="P444"><text:span text:style-name="T904">🎨 안과 밖이 조화를 이루는 정교한 생명 연금술</text:span><text:span/></text:p>
      <text:p text:style-name="P445"><text:span text:style-name="T905">결국 인간의 몸이 완성된다는 건 부모가 준 물질적 유산이 안과 밖에서 완벽한 균형을 이루며 결합하는 거대한 예술 작품과 같아. 아버지가 물려준 단단한 내벽의 골조와 어머니가 선사한 부드러운 외벽의 생명력이 결합하여 하나의 완벽한 우주를 창조해내는 셈이지. 이 여섯 가지 보배가 정교하게 맞물려 돌아가기 시작하면서, 핏덩이에 불과했던 존재는 비로소 인간다운 형태의 기틀을 갖추게 돼.</text:span><text:span/></text:p>
      <text:p text:style-name="P446"><text:span text:style-name="T906">📝 핵심 요약</text:span><text:span/></text:p>
      <text:list text:style-name="WWNum25" text:continue-numbering="true">
        <text:list-item>
          <text:p text:style-name="P447"><text:span text:style-name="T907">태내 임신 제4주가 되면 부모에게 받은 하얀 보리심과 붉은 보리심이 청정함과 무거움으로 분화됨.</text:span><text:span/></text:p>
        </text:list-item>
        <text:list-item>
          <text:p text:style-name="P448"><text:span text:style-name="T908">부계에서 유래한 하얀 보리심의 정수는 몸 안의 3가지 보배인 정액, 뼈, 골수를 형성함.</text:span><text:span/></text:p>
        </text:list-item>
        <text:list-item>
          <text:p text:style-name="P449"><text:span text:style-name="T909">모계에서 유래한 붉은 보리심의 정수는 몸 밖의 3가지 보배인 살, 피부, 피를 생성함.</text:span><text:span/></text:p>
        </text:list-item>
        <text:list-item>
          <text:p text:style-name="P450"><text:span text:style-name="T910">원심분리기의 정제 과정처럼 안팎의 여섯 가지 보배가 균형을 이루며 신체의 기틀을 완성함.</text:span><text:span/></text:p>
        </text:list-item>
      </text:list>
      <text:p text:style-name="P451"><text:span><text:soft-page-break/></text:span><text:span/><text:span/></text:p>
      <text:p text:style-name="P452"><text:span text:style-name="T911">132. 심장의 탄생과 에너지 맥의 형성</text:span><text:span/></text:p>
      <text:p text:style-name="P453"><text:span text:style-name="T912">🔑 핵심 키워드: 불괴명점, 풍심, 아와두띠, 삼맥, 심장의 형성</text:span><text:span/></text:p>
      <text:p text:style-name="P454"><text:span text:style-name="T913">❤️ 우리 존재의 첫 번째 안착지, 심장</text:span><text:span/></text:p>
      <text:p text:style-name="P455"><text:span text:style-name="T914">바르도의 의식이 부모의 정혈과 처음 만나는 그 아주 작은 지점은 나중에 우리 몸에서 가장 중요한 심장이 되는 자리야. 집을 지을 때 가장 먼저 중심축이 되는 주춧돌을 놓는 것처럼, 우리 영혼도 육체라는 새로운 집을 지을 때 심장이라는 기초 공사부터 시작하는 셈이지. 이 최초의 결합 장소를 중심으로 우리 온몸의 신경망과 생명 에너지가 사방으로 퍼져나가게 된다고 보면 돼.</text:span><text:span/></text:p>
      <text:p text:style-name="P456"><text:span text:style-name="T915">🔬 네 가지 요소가 뭉친 작은 우주의 씨앗</text:span><text:span/></text:p>
      <text:p text:style-name="P457"><text:span text:style-name="T916">이 심장이 될 자리에는 아주 놀라운 우주의 씨앗이 형성되는데, 불교에서는 이를 불괴명점이라고 불러. 여기에는 극도로 미세한 정신과 에너지인 풍심 두 가지와 부모에게서 받은 하얗고 붉은 보리심 두 가지가 한데 합쳐져 있지. 마치 온갖 최첨단 정보가 압축되어 들어있는 아주 작은 마이크로칩처럼, 흰 겨자씨만 한 작은 크기 속에 우리 생명의 모든 비밀이 고스란히 담겨 있는 밀도 높은 공간이란다.</text:span><text:span/></text:p>
      <text:p text:style-name="P458"><text:span text:style-name="T917">🌀 중심을 흐르는 생명의 고속도로, 중맥</text:span><text:span/></text:p>
      <text:p text:style-name="P459"><text:span text:style-name="T918">의식이 이 겨자씨만 한 점 안에서 깊은 잠에 빠지듯 혼절한 상태를 거치면서, 그 중심으로부터 아와두띠라는 중심 맥이 똑바로 뻗어나오기 시작해. 이것은 우리 몸 한가운데를 관통하는 생명의 초고속 고속도로이자, 건물을 튼튼하게 지탱하는 가장 거대한 중심 기둥과 같아. 이 중심 통로가 바르게 서야만 비로소 온몸으로 맑고 순수한 에너지가 치우침 없이 흐를 수 있게 되지.</text:span><text:span/></text:p>
      <text:p text:style-name="P460"><text:span text:style-name="T919">🪢 좌우에서 중심을 감싸는 에너지 매듭</text:span><text:span/></text:p>
      <text:p text:style-name="P461"><text:span text:style-name="T920">중심 맥이 자리를 잡으면 그 좌우에서 라싸나라는 우맥과 랄라나라는 좌맥 두 가지 에너지 통로가 함께 생겨나. 이 두 맥은 그냥 나란히 흐르는 게 아니라, 중심 맥을 양쪽에서 각각 세 번씩 단단하게 감싸 안으며 신비로운 매듭 모양을 만들지. 마치 돛대를 튼튼하게 고정하기 위해 밧줄을 양쪽으로 단단히 꼬아 매는 것처럼, 이 맥들의 결합을 통해 우리 몸의 음양 에너지가 중심을 잡고 안정적인 신체 구조를 완성하게 되는 거야.</text:span><text:span/></text:p>
      <text:p text:style-name="P462"><text:span text:style-name="T921">📝 핵심 요약</text:span><text:span/></text:p>
      <text:list text:style-name="WWNum26" text:continue-numbering="true">
        <text:list-item>
          <text:p text:style-name="P463"><text:span text:style-name="T922">바르도 의식이 처음 깃든 부모의 정혈 자리는 향후 우리 몸의 중심인 심장으로 발달한다.</text:span><text:span/></text:p>
        </text:list-item>
        <text:list-item>
          <text:p text:style-name="P464"><text:span text:style-name="T923">심장 자리에는 풍심과 남녀의 보리심이 결합한 흰 겨자씨 크기의 불괴명점이 형성된다.</text:span><text:span/></text:p>
        </text:list-item>
        <text:list-item>
          <text:p text:style-name="P465"><text:span text:style-name="T924">이 점의 중심에서 몸의 가장 핵심 에너지 통로인 아와두띠(중맥)가 곧게 뻗어나온다.</text:span><text:span/></text:p>
        </text:list-item>
        <text:list-item>
          <text:p text:style-name="P466"><text:span text:style-name="T925">중심 맥 좌우로 라싸나(우맥)와 랄라나(좌맥)가 생겨나 중심 맥을 세 번씩 감으며 매듭을 이룬다.</text:span><text:span/></text:p>
        </text:list-item>
      </text:list>
      <text:p text:style-name="P467"><text:span><text:soft-page-break/></text:span><text:span/><text:span/></text:p>
      <text:p text:style-name="P468"><text:span text:style-name="T926">133. 상하 에너지의 흐름과 물고기 모양의 생명 형성</text:span><text:span/></text:p>
      <text:p text:style-name="P469"><text:span text:style-name="T927">🔑 핵심 키워드: 상행풍, 하행풍, 3맥의 확장, 물고기 형상, 생명 에너지</text:span><text:span/></text:p>
      <text:p text:style-name="P470"><text:span text:style-name="T928">🌬️ 위아래로 끌어당기는 이중 에너지의 시작</text:span><text:span/></text:p>
      <text:p text:style-name="P471"><text:span text:style-name="T929">몸 안에서 생명이 한 단계 더 정교하게 빚어질 때, 아주 흥미로운 에너지의 밀당이 시작돼. 위쪽으로 거침없이 거슬러 올라가려는 성질을 가진 상행풍인 우다나와, 아래쪽으로 묵직하게 내려가려는 성질을 가진 하행풍인 아빠나가 동시에 작동하는 거지. 이것은 마치 하나의 가래떡이나 고무찰흙을 양손으로 잡고 한쪽은 위로, 다른 한쪽은 아래로 동시에 쭉 늘리는 과정과 아주 비슷하단다. 이 두 가지 서로 반대되는 힘이 팽팽하게 맞서면서, 몸의 중심부에는 거대한 에너지의</text:span><text:span text:style-name="T930"> 긴장감과 역동적인 성장 동력이 생겨나게 돼.</text:span><text:span/></text:p>
      <text:p text:style-name="P472"><text:span text:style-name="T931">🌱 위아래로 힘차게 자라나는 세 가지 중심 맥도</text:span><text:span/></text:p>
      <text:p text:style-name="P473"><text:span text:style-name="T932">이렇게 위아래로 강력하게 잡아당기는 에너지의 힘을 받아서, 우리 몸의 근본 줄기인 아와두띠, 라싸나, 랄라나라는 세 가지 중요한 맥이 위아래로 길게 자라나기 시작해. 식물의 씨앗이 땅에 심어졌을 때, 줄기는 햇빛을 향해 위로 뻗어가고 뿌리는 대지를 향해 아래로 깊숙이 파고드는 것과 똑같은 이치야. 이 세 가지 중심 통로가 에너지의 길을 탄탄하게 열어주면서, 생명체로서의 기본적인 골격과 순환계의 기초가 비로소 위아래로 균형 있게 자리를 잡아가게 되는 거란다</text:span><text:span text:style-name="T933">.</text:span><text:span/></text:p>
      <text:p text:style-name="P474"><text:span text:style-name="T934">🐟 양끝은 가늘고 가운데는 불룩한 물고기 모양</text:span><text:span/></text:p>
      <text:p text:style-name="P475"><text:span text:style-name="T935">두 기운이 양방향으로 맥을 잡아당기면서, 형성되는 신체의 외형도 아주 독특한 실루엣을 갖추게 돼. 머리가 있는 상부와 몸의 하부는 에너지가 길게 늘어나느라 아주 가늘어지지만, 두 기운이 팽팽하게 교차하는 한가운데 중심부는 에너지가 응축되어 불룩하게 솟아오르거든. 이 모습은 마치 바다를 자유롭게 헤엄치는 날렵한 물고기의 몸통과 아주 닮아 있어. 물의 저항을 최소화하기 위해 앞뒤는 날씬하고 가운데는 통통하게 디자인된 잠수함이나 카약의 구조처럼, 생명의 초기 </text:span><text:span text:style-name="T936">형태가 완벽한 유선형을 이루는 신비로운 순간이지.</text:span><text:span/></text:p>
      <text:p text:style-name="P476"><text:span text:style-name="T937">🌌 우주의 법칙을 닮은 초기 생명의 신비</text:span><text:span/></text:p>
      <text:p text:style-name="P477"><text:span text:style-name="T938">이 물고기 모양의 형상은 단순히 우연히 만들어진 외형이 아니라, 우주가 생명을 빚어내는 가장 근본적인 기하학적 법칙을 보여주는 거야. 실제로 현대 과학에서 밝혀낸 인간의 초기 배아 모습도 물고기와 매우 닮아 있다는 점을 떠올려 보면, 옛 성인들이 관찰한 이 에너지의 흐름이 얼마나 정확한지 새삼 감탄하게 되지. 거친 물질적 형태가 완전히 고착되기 전, 보이지 않는 미세한 바람의 기운들이 씨줄과 날줄처럼 엮이면서 생명의 가장 아름답고 효율적인 첫 구조를 완성</text:span><text:span text:style-name="T939">해 나가는 과정란다.</text:span><text:span/></text:p>
      <text:p text:style-name="P478"><text:span text:style-name="T940">📝 핵심 요약</text:span><text:span/></text:p>
      <text:list text:style-name="WWNum27" text:continue-numbering="true">
        <text:list-item>
          <text:p text:style-name="P479"><text:span text:style-name="T941">위로 향하는 상행풍과 아래로 향하는 하행풍이 동시에 작용하며 에너지의 인장력을 만듦.</text:span><text:span/></text:p>
        </text:list-item>
        <text:list-item>
          <text:p text:style-name="P480"><text:span text:style-name="T942">이 양방향의 힘에 의해 아와두띠를 포함한 세 가지 중심 맥이 위아래로 길게 확장됨.</text:span><text:span/></text:p>
        </text:list-item>
        <text:list-item>
          <text:p text:style-name="P481"><text:span text:style-name="T943">상하부는 가늘어지고 중심부는 불룩해지면서 유선형의 물고기를 닮은 신체 구조를 형성함.</text:span><text:span/></text:p>
        </text:list-item>
        <text:list-item>
          <text:p text:style-name="P482"><text:span text:style-name="T944">보이지 않는 에너지의 흐름이 현대 발생학의 배아 모습과 일치하는 생명의 기초를 빚어냄.</text:span><text:span/></text:p>
        </text:list-item>
      </text:list>
      <text:p text:style-name="P483"><text:span><text:soft-page-break/></text:span><text:span/><text:span/></text:p>
      <text:p text:style-name="P484"><text:span text:style-name="T945">[🟢 Online Mode | 26.06.05_15:50:04]</text:span><text:span/></text:p>
      <text:p text:style-name="P485"><text:span text:style-name="T946">134. 다섯 돌기에서 완전한 의식까지의 태아 발달</text:span><text:span/></text:p>
      <text:p text:style-name="P486"><text:span text:style-name="T947">🔑 핵심 키워드: 다섯 돌기, 신체 기관 형성, 발음기관, 기억의 의식, 점진적 발달</text:span><text:span/></text:p>
      <text:p text:style-name="P487"><text:span text:style-name="T948">🌱 1. 다섯 돌기와 사지의 형성</text:span><text:span/></text:p>
      <text:p text:style-name="P488"><text:span text:style-name="T949">정혈의 요람 속에서 안정을 찾은 의식은 이제 본격적으로 거대한 건축물을 세우듯 신체를 빚어내기 시작해. 가장 먼저 작고 귀여운 다섯 개의 돌기가 돋아나는데, 이는 마치 씨앗에서 조심스럽게 첫 싹이 움트는 모양과 같지. 이 돌기들이 점차 자라나면서 머리와 양팔, 양다리라는 인간의 완전한 다섯 가지 신체 부위로 모양을 갖추게 된단다. 뼈대와 기둥이 세워지며 생명의 외형이 멋지게 완성되는 첫 단추야.</text:span><text:span/></text:p>
      <text:p text:style-name="P489"><text:span text:style-name="T950">👁️ 2. 미세한 신체 조직과 감각 기관의 완성</text:span><text:span/></text:p>
      <text:p text:style-name="P490"><text:span text:style-name="T951">커다란 건물 구조가 완성되면 다음으로 섬세한 인테리어 공사가 진행되듯, 몸의 세부적인 조직들이 차례대로 채워지게 돼. 이 경이로운 성장 과정을 직관적으로 이해할 수 있게 표로 정리해 줄게.</text:span><text:span/></text:p>
      <table:table table:style-name="ta3">
        <table:table-columns>
          <table:table-column table:style-name="co7"/>
          <table:table-column table:style-name="co8"/>
          <table:table-column table:style-name="co9"/>
        </table:table-columns>
        <table:table-row table:style-name="ro7" table:default-cell-style-name="ce21">
          <table:table-cell table:style-name="ce22">
            <text:p text:style-name="P491"><text:span text:style-name="T952">발달 영역</text:span><text:span/></text:p>
          </table:table-cell>
          <table:table-cell table:style-name="ce23">
            <text:p text:style-name="P492"><text:span text:style-name="T953">형성되는 신체 및 감각 구조</text:span><text:span/></text:p>
          </table:table-cell>
          <table:table-cell table:style-name="ce24">
            <text:p text:style-name="P493"><text:span text:style-name="T954">의식 차원의 비유</text:span><text:span/></text:p>
          </table:table-cell>
        </table:table-row>
        <table:table-row table:style-name="ro8" table:default-cell-style-name="ce21">
          <table:table-cell table:style-name="ce25">
            <text:p text:style-name="P494"><text:span text:style-name="T955">미세 조직</text:span><text:span/></text:p>
          </table:table-cell>
          <table:table-cell table:style-name="ce26">
            <text:p text:style-name="P495"><text:span text:style-name="T956">머리털, 손발톱, 온몸을 덮는 미세한 털</text:span><text:span/></text:p>
          </table:table-cell>
          <table:table-cell table:style-name="ce27">
            <text:p text:style-name="P496"><text:span text:style-name="T957">건물의 내부를 채우는 세부 인테리어 공사</text:span><text:span/></text:p>
          </table:table-cell>
        </table:table-row>
        <table:table-row table:style-name="ro9" table:default-cell-style-name="ce21">
          <table:table-cell table:style-name="ce28">
            <text:p text:style-name="P497"><text:span text:style-name="T958">소통 기관</text:span><text:span/></text:p>
          </table:table-cell>
          <table:table-cell table:style-name="ce29">
            <text:p text:style-name="P498"><text:span text:style-name="T959">눈 등의 감각기관, 남녀의 성기</text:span><text:span/></text:p>
          </table:table-cell>
          <table:table-cell table:style-name="ce30">
            <text:p text:style-name="P499"><text:span text:style-name="T960">외부 세계와 연결하기 위한 정밀 센서 장착</text:span><text:span/></text:p>
          </table:table-cell>
        </table:table-row>
      </table:table>
      <text:p text:style-name="P500"><text:span text:style-name="T961">이는 최첨단 로봇에 정밀한 부품들을 하나씩 조립하여 세상과 소통할 완벽한 준비를 마치는 과정과 같단다.</text:span><text:span/></text:p>
      <text:p text:style-name="P501"><text:span text:style-name="T962">🌬️ 3. 호흡의 시작과 여덟 가지 발음 기관</text:span><text:span/></text:p>
      <text:p text:style-name="P502"><text:span text:style-name="T963">신체 형태가 완전히 갖춰지면 이제 생명의 에너지가 안팎으로 순환하기 시작해. 입을 통해 부드럽게 들락날락하는 호흡의 기운이 깨어나는데, 이것은 마치 오랫동안 멈춰 있던 자동차의 엔진에 처음으로 시동을 걸어 활력을 불어넣는 장면과 비슷하지. 이와 동시에 혀와 입천장 등 소리를 내기 위한 여덟 가지 발음기관도 완벽하게 조율된단다. 연주자가 악기의 줄을 고르듯, 세상에 나와 자신의 존재를 소리로 표현할 아름다운 악기가 몸속에 완성되는 셈이야.</text:span><text:span/></text:p>
      <text:p text:style-name="P503"><text:span text:style-name="T964">🧠 4. 바깥 세상을 향한 완전한 기억과 의식의 완성</text:span><text:span/></text:p>
      <text:p text:style-name="P504"><text:span text:style-name="T965">육체적인 준비가 모두 끝나면 마침내 이 모든 시스템을 움직일 최고의 소프트웨어인 정신 세계가 깨어나게 돼. 바깥의 수많은 사물과 대상을 향해 자유롭게 움직이고 인지하는 완전한 기억의 의식들이 차례대로 발생하는 단계지. 컴퓨터의 모든 하드웨어를 조립한 뒤 마지막으로 전원을 켜고 운영체제를 구동하는 상황으로 비유할 수 있어. 이로써 태아는 단순한 세포 덩어리가 아니라, 세상을 기억하고 경험할 수 있는 완전한 하나의 존엄한 존재로 거듭나게 된단다.</text:span><text:span/></text:p>
      <text:p text:style-name="P505"><text:span text:style-name="T966">📝 핵심 요약</text:span><text:span/></text:p>
      <text:list text:style-name="WWNum28" text:continue-numbering="true">
        <text:list-item>
          <text:p text:style-name="P506"><text:span text:style-name="T967">다섯 개의 작은 돌기가 싹트듯 자라나 머리와 사지라는 완전한 신체 구조를 형성해.</text:span><text:span/></text:p>
        </text:list-item>
        <text:list-item>
          <text:p text:style-name="P507"><text:span text:style-name="T968">털과 손발톱이 자라고 감각 기관과 성기가 생겨나며 외부와 소통할 하드웨어가 완성돼.</text:span><text:span/></text:p>
        </text:list-item>
        <text:list-item>
          <text:p text:style-name="P508"><text:span text:style-name="T969">입을 통한 호흡이 시작되고 여덟 가지 발음기관이 조율되며 생명의 엔진이 켜져.</text:span><text:span/></text:p>
        </text:list-item>
        <text:list-item>
          <text:p text:style-name="P509"><text:span text:style-name="T970">최종적으로 대상을 인지하고 기억하는 정신의 전원이 켜지며 완전한 존재로 완성돼.</text:span><text:span/></text:p>
        </text:list-item>
      </text:list>
      <text:p text:style-name="P510"><text:span><text:soft-page-break/></text:span><text:span/><text:span/></text:p>
      <text:p text:style-name="P511"><text:span text:style-name="T971">[🟢 Online Mode | 26.06.05_15:55:00]</text:span><text:span/></text:p>
      <text:p text:style-name="P512"><text:span text:style-name="T972">135. 모태 안 태아의 성별에 따른 신비로운 자세</text:span><text:span/></text:p>
      <text:p text:style-name="P513"><text:span text:style-name="T973">🔑 핵심 키워드: 모태 착상, 남아의 위치, 여아의 위치, 웅크린 자세</text:span><text:span/></text:p>
      <text:p text:style-name="P514"><text:span text:style-name="T974">🥚 요람 속 생명의 독특한 정착</text:span><text:span/></text:p>
      <text:p text:style-name="P515"><text:span text:style-name="T975">모태라는 따뜻하고 안전한 우주에 완벽하게 자리를 잡은 태아는 단순히 무작위로 누워 있는 것이 아니라, 자신의 성별에 따라 놀라울 정도로 정교하고 규칙적인 방향을 취하게 돼. 비유하자면 거대한 극장에 들어온 관객들이 지정석 티켓을 확인하고 자신에게 배정된 정확한 좌석과 방향을 찾아 정숙하게 앉는 과정과 비슷하지. 이 단계에서 생명은 앞으로의 건강한 성장을 위한 가장 안정적인 기본 대형을 스스로 형성하게 되는 거야.</text:span><text:span/></text:p>
      <text:p text:style-name="P516"><text:span text:style-name="T976">🏹 어머니의 척추를 바라보는 남아의 우측 배치</text:span><text:span/></text:p>
      <text:p text:style-name="P517"><text:span text:style-name="T977">만약 모태 속의 아기가 남아이면 어머니의 오른쪽 허파 아래쪽에 둥지를 틀고, 몸을 동그랗게 말아 등을 돌린 채 어머니의 척추 뼈를 향해 웅크린 자세를 취하게 돼.</text:span><text:span/></text:p>
      <text:list text:style-name="WWNum29" text:continue-numbering="true">
        <text:list-item>
          <text:p text:style-name="P518"><text:span text:style-name="T978">위치: 어머니 몸의 우측 영역에 긴밀하게 안착함</text:span><text:span/></text:p>
        </text:list-item>
        <text:list-item>
          <text:p text:style-name="P519"><text:span text:style-name="T979">방향: 전면이 아닌 등 뒤에 있는 척추를 향해 시선을 둠</text:span><text:span/></text:p>
        </text:list-item>
        <text:list-item>
          <text:p text:style-name="P520"><text:span text:style-name="T980">비유: 거센 바람이 부는 날, 바람을 피하기 위해 든든한 벽을 향해 등을 돌리고 포근하게 몸을 말아 웅크린 여행자의 모습과 아주 흡사하지.</text:span><text:span/></text:p>
        </text:list-item>
      </text:list>
      <text:p text:style-name="P521"><text:span text:style-name="T981">🌅 세상을 향해 정면을 바라보는 여아의 좌측 배치</text:span><text:span/></text:p>
      <text:p text:style-name="P522"><text:span text:style-name="T982">반대로 태중의 아기가 여아이면 어머니의 왼쪽 허파 아래쪽 공간에 자리를 잡으며, 남아와는 완전히 다르게 어머니의 전면을 똑바로 바라보는 정방향으로 웅크리게 돼.</text:span><text:span/></text:p>
      <text:list text:style-name="WWNum29" text:continue-numbering="true">
        <text:list-item>
          <text:p text:style-name="P523"><text:span text:style-name="T983">위치: 어머니 몸의 좌측 영역에 안전하게 안착함</text:span><text:span/></text:p>
        </text:list-item>
        <text:list-item>
          <text:p text:style-name="P524"><text:span text:style-name="T984">방향: 척추가 아닌 어머니의 가슴과 배가 있는 앞쪽을 향함</text:span><text:span/></text:p>
        </text:list-item>
        <text:list-item>
          <text:p text:style-name="P525"><text:span text:style-name="T985">비유: 무대 위의 주인공이 관객석을 향해 정면으로 앉아 다정하게 무릎을 안고 대화를 나눌 준비를 하는 평온한 모습과 똑같아. 오른쪽과 왼쪽, 뒤와 앞이라는 완벽한 대칭을 이루는 생명의 규칙성을 보여주는 대목이지.</text:span><text:span/></text:p>
        </text:list-item>
      </text:list>
      <text:p text:style-name="P526"><text:span text:style-name="T986">📦 성장을 위해 몸을 가장 작게 마는 웅크림</text:span><text:span/></text:p>
      <text:p text:style-name="P527"><text:span text:style-name="T987">아기가 동그랗게 무릎을 맞대고 웅크린 자세를 유지하는 것은 제한된 태내 공간을 가장 효율적으로 활용하면서 자신의 연약한 신체 기관들을 보호하기 위한 본능적인 선택이야. 마치 우주선에 탑승한 대원이 좁은 캡슐 안에서 가해지는 충격을 최소화하기 위해 몸을 최대로 구부려 중심을 잡는 상태와 완벽하게 부합하지. 이 정교한 포용의 자세 속에서 아기는 세상 밖으로 완전히 한 걸음 나아갈 준비를 차근차근 다져가게 돼.</text:span><text:span/></text:p>
      <text:p text:style-name="P528"><text:span text:style-name="T988">📝 핵심 요약</text:span><text:span/></text:p>
      <text:list text:style-name="WWNum29" text:continue-numbering="true">
        <text:list-item>
          <text:p text:style-name="P529"><text:span text:style-name="T989">태아가 모태에 안정적으로 착상한 이후 성별에 따라 고유의 방위와 자세가 결정됨.</text:span><text:span/></text:p>
        </text:list-item>
        <text:list-item>
          <text:p text:style-name="P530"><text:span text:style-name="T990">남아는 어머니 몸의 우측에 자리를 잡으며 등을 돌려 척추 쪽을 향해 웅크림.</text:span><text:span/></text:p>
        </text:list-item>
        <text:list-item>
          <text:p text:style-name="P531"><text:span text:style-name="T991">여아는 어머니 몸의 좌측에 자리를 잡으며 남아와 달리 전면을 향해 웅크림.</text:span><text:span/></text:p>
        </text:list-item>
        <text:list-item>
          <text:p text:style-name="P532"><text:span text:style-name="T992">두 성별 모두 몸을 동그랗게 마는 자세를 통해 공간 효율성과 신체 보호를 동시에 달성함.</text:span><text:span/></text:p>
        </text:list-item>
      </text:list>
      <text:p text:style-name="P533"><text:span><text:soft-page-break/></text:span><text:span/><text:span/></text:p>
      <text:p text:style-name="P534"><text:span text:style-name="T993">[🟢 Online Mode | 26.06.05_15:50:17]</text:span><text:span/></text:p>
      <text:p text:style-name="P535"><text:span text:style-name="T994">136. 태아가 어머니 품에 머무는 신비로운 시간</text:span><text:span/></text:p>
      <text:p text:style-name="P536"><text:span text:style-name="T995">🔑 핵심 키워드: 입태경, 유가사지론, 자궁 체류 기간, 고대 계산법, 생명의 준비</text:span><text:span/></text:p>
      <text:p text:style-name="P537"><text:span text:style-name="T996">🤰 여러 경전이 가리키는 태아의 머무름</text:span><text:span/></text:p>
      <text:p text:style-name="P538"><text:span text:style-name="T997">새로운 생명이 어머니의 자궁 안에서 세상을 만날 준비를 하는 기간에 대해 고대의 위대한 불교 스승들은 아주 흥미로운 기록들을 남겨두었어. 가장 먼저 『입태경』이라는 경전에서는 태아가 자궁 안에서 정확히 38주를 채우고 세상 밖으로 나온다고 기록하고 있지. 이를 날짜로 환산하면 266일이라는 숫자가 나오는데, 이는 현대 의학에서 말하는 평균적인 임신 기간과도 놀라울 정도로 거의 일치하는 정밀한 관찰의 결과란다.</text:span><text:span/></text:p>
      <text:p text:style-name="P539"><text:span text:style-name="T998">🗓️ 유가사지론과 돔중이 보탠 정밀한 계산</text:span><text:span/></text:p>
      <text:p text:style-name="P540"><text:span text:style-name="T999">반면에 또 다른 명저인 『유가사지론』의 「본지분」에서는 이 266일에다가 4일을 더 보태어, 정확히 270일을 채워야 비로소 아기가 태어난다고 설명해. 한편 『돔중』이라는 탄트라 문헌에서는 태아가 10개월째가 되는 달에 모태 밖으로 나오는 존재가 있다고 언급하고 있지. 겉보기에는 38주, 270일, 10개월이라는 숫자가 서로 조금씩 달라서 내용이 부딪히는 것처럼 보일 수 있어.</text:span><text:span/></text:p>
      <text:p text:style-name="P541"><text:span text:style-name="T1000">⏰ 다른 표현 속에 숨겨진 하나의 약속</text:span><text:span/></text:p>
      <text:p text:style-name="P542"><text:span text:style-name="T1001">하지만 이 세 가지 기록은 알고 보면 완벽하게 같은 기간을 말하고 있는 거야. 스마트폰 배송 앱 마다 도착 예정일을 "일주일 뒤", "7일 뒤", 혹은 "다음 주 화요일"로 다르게 표기해도 결국 같은 날 물건이 당도하는 것과 똑같지. 고대 인도 문헌에서는 4주(28일)를 정확히 한 달로 계산했고 이때의 하루는 온전한 24시간을 의미했기 때문에, 이 계산법을 대입하면 세 경전 모두 '9개월을 꽉 채우고 10개월 차로 접어드는 시점'이라는 하나의 결론으로 아</text:span><text:span text:style-name="T1002">름답게 모이게 돼.</text:span><text:span/></text:p>
      <text:p text:style-name="P543"><text:span text:style-name="T1003">🕊️ 온전한 성장을 위해 채워야 하는 약속의 시간</text:span><text:span/></text:p>
      <text:p text:style-name="P544"><text:span text:style-name="T1004">경전들이 이처럼 하루 단위까지 꼼꼼하게 짚어가며 기간을 정의한 이유는, 인간의 몸이 우주의 축소판으로서 완벽한 조화를 갖추기 위해 필요한 절대적인 물리적 시간이 존재하기 때문이야. 어머니의 따뜻한 자궁 속에서 육체와 에너지가 한 치의 오차도 없이 온전히 무르익어야만 비로소 남섬부주의 완전한 인간으로 첫발을 내딛을 수 있기에, 이 270일 전후의 시간은 생명이 치르는 장엄하고도 신성한 대기 시간인 셈이지.</text:span><text:span/></text:p>
      <text:p text:style-name="P545"><text:span text:style-name="T1005">📝 핵심 요약</text:span><text:span/></text:p>
      <text:list text:style-name="WWNum30" text:continue-numbering="true">
        <text:list-item>
          <text:p text:style-name="P546"><text:span text:style-name="T1006">『입태경』은 태아가 자궁에 머무는 기간을 38주(266일)로 명시하고 있다.</text:span><text:span/></text:p>
        </text:list-item>
        <text:list-item>
          <text:p text:style-name="P547"><text:span text:style-name="T1007">『유가사지론』은 여기에 4일을 더한 270일을, 『돔중』은 10개월째에 출생한다고 전한다.</text:span><text:span/></text:p>
        </text:list-item>
        <text:list-item>
          <text:p text:style-name="P548"><text:span text:style-name="T1008">고대의 계산법(한 달을 28일로 계산)을 적용하면 이 세 가지 기록은 모두 동일한 기간을 뜻한다.</text:span><text:span/></text:p>
        </text:list-item>
        <text:list-item>
          <text:p text:style-name="P549"><text:span text:style-name="T1009">이는 새 생명이 세상에 나오기 전 완벽한 신체적·에너지적 조화를 이루기 위해 필요한 신성한 시간이다.</text:span><text:span/></text:p>
        </text:list-item>
      </text:list>
      <text:p text:style-name="P550"><text:span><text:soft-page-break/></text:span><text:span/><text:span/></text:p>
      <text:p text:style-name="P551"><text:span text:style-name="T1010">137. 태아의 신체·정신적 완비와 자궁 탈출의 갈망</text:span><text:span/></text:p>
      <text:p text:style-name="P552"><text:span text:style-name="T1011">🔑 핵심 키워드: 온계처 완비, 언어 기관 형성, 기억의 의식, 자궁 탈출 의지</text:span><text:span/></text:p>
      <text:p text:style-name="P553"><text:span text:style-name="T1012">👶 임신 35주째에 접어들면 태아의 몸은 온, 계, 처라는 불교적 구성요소뿐만 아니라 팔다리, 손발가락, 머리카락, 손발톱까지 모두 완벽하게 갖추게 돼. 발성 기관인 혀와 턱까지 정밀하게 조립되는데, 이는 마치 공장에서 모든 정밀 부품과 외관 조립을 끝내고 출고를 앞둔 최첨단 로켓과 같지. 하드웨어적인 모든 준비가 완벽하게 마무리되어 이제 세상에 나가기만 하면 되는 최종 단계에 도달한 거야.</text:span><text:span/></text:p>
      <text:p text:style-name="P554"><text:span text:style-name="T1013">🧠 신체적인 성장과 더불어 바깥세상의 사물을 명확하게 인식하고 기억할 수 있는 정신적인 의식 시스템도 이 시기에 함께 완성돼. 아무리 멋진 스마트폰 하드웨어를 만들었어도 내부를 구동할 운영체제와 소프트웨어가 설치되지 않으면 고철에 불과한 것처럼, 태아의 뇌 신경망에 세상과 소통할 정신적 프로그램이 완벽히 세팅되는 셈이지. 이제 아이는 단순히 몸만 자란 존재가 아니라, 생각하고 기억하는 온전한 인격체로 거듭나게 되는 거야.</text:span><text:span/></text:p>
      <text:p text:style-name="P555"><text:span text:style-name="T1014">🚪 이제 모든 준비를 마친 36주째가 되면 태아는 그동안 자신을 따뜻하게 보호해 주던 자궁이라는 공간을 점차 답답하고 불쾌하게 느끼기 시작해. 비좁은 대기실에서 오랜 시간 순서를 기다리던 주인공이 마침내 화려한 무대 위로 뛰어 나가고 싶어 하는 강렬한 열망을 품는 것과 똑같아. 안전한 안식처였던 공간이 이제는 넘어야 할 벽으로 인식되면서, 바깥세상으로 탈출하고자 하는 강력한 생명적 의지를 스스로 싹틔우게 되지.</text:span><text:span/></text:p>
      <text:p text:style-name="P556"><text:span text:style-name="T1015">😷 마지막 37주째에 이르면 태아는 자신이 머물던 자궁 내부 환경이 아주 냄새나고 더러운 곳이라는 구체적인 부정의 인식을 일으키게 돼. 어두컴컴하고 막힌 터널 속의 답답함을 온몸으로 깨닫고, 저 멀리 보이는 밝고 깨끗한 출구를 향해 발걸음을 재촉하는 나그네의 심정과 아주 비슷해. 이러한 자궁에 대한 거부감은 태아가 모태와의 결속을 끊고 스스로 세상 밖으로 걸어 나오게 만드는 결정적인 영적, 신체적 추진력이 되어 주지.</text:span><text:span/></text:p>
      <text:p text:style-name="P557"><text:span text:style-name="T1016">📝 핵심 요약</text:span><text:span/></text:p>
      <text:list text:style-name="WWNum31" text:continue-numbering="true">
        <text:list-item>
          <text:p text:style-name="P558"><text:span text:style-name="T1017">35주째에는 온, 계, 처를 비롯한 신체 전반과 혀, 턱 등의 발성 기관이 완벽하게 구족된다.</text:span><text:span/></text:p>
        </text:list-item>
        <text:list-item>
          <text:p text:style-name="P559"><text:span text:style-name="T1018">신체 완비와 동시에 외부 사물을 인식하고 기억할 수 있는 온전한 정신적 의식이 완비된다.</text:span><text:span/></text:p>
        </text:list-item>
        <text:list-item>
          <text:p text:style-name="P560"><text:span text:style-name="T1019">36주째에는 자궁을 답답하게 여겨 바깥 세상으로 나가고자 하는 탈출 의지를 일으킨다.</text:span><text:span/></text:p>
        </text:list-item>
        <text:list-item>
          <text:p text:style-name="P561"><text:span text:style-name="T1020">37주째에는 자궁 내부를 부정하게 인식하며 모태를 벗어나기 위한 최종적인 추진력을 얻는다.</text:span><text:span/></text:p>
        </text:list-item>
      </text:list>
      <text:p text:style-name="P562"><text:span><text:soft-page-break/></text:span><text:span/><text:span/></text:p>
      <text:p text:style-name="P563"><text:span text:style-name="T1021">138. 새로운 세상으로의 출격을 준비하는 38주의 기적</text:span><text:span/></text:p>
      <text:p text:style-name="P564"><text:span text:style-name="T1022">🔑 핵심 키워드: 38주째, 지분의 바람, 과거의 업, 자세의 전환, 산문</text:span><text:span/></text:p>
      <text:p text:style-name="P565"><text:span text:style-name="T1023">⏰ 38주의 기다림과 운명적인 타이밍</text:span><text:span/></text:p>
      <text:list text:style-name="WWNum32" text:continue-numbering="true">
        <text:list-item>
          <text:p text:style-name="P566"><text:span text:style-name="T1024">모태 안에서 이어지던 긴 여정이 드디어 마지막 관문인 38주째에 접어들게 돼.</text:span><text:span/></text:p>
        </text:list-item>
        <text:list-item>
          <text:p text:style-name="P567"><text:span text:style-name="T1025">이 시기는 단순히 시간이 흘러서 도달한 순간이 아니라, 전생부터 이어져 온 거대한 인과의 업이 다음 무대를 열라고 보내는 완벽한 신호탄이지.</text:span><text:span/></text:p>
        </text:list-item>
        <text:list-item>
          <text:p text:style-name="P568"><text:span text:style-name="T1026">마치 오랜 시간 기지에서 정비를 마치고 마침내 카운트다운을 시작하는 우주선처럼, 우주적 타이밍이 마침내 맞아떨어진 상태를 의미해.</text:span><text:span/></text:p>
        </text:list-item>
      </text:list>
      <text:p text:style-name="P569"><text:span text:style-name="T1027">🌬️ 출격을 명령하는 지분의 바람</text:span><text:span/></text:p>
      <text:p text:style-name="P570"><text:span text:style-name="T1028">이때 태아의 내면에서는 과거의 업으로부터 싹튼 지분이라는 특별한 생명의 바람이 강력하게 몰아치기 시작해. 이 바람은 신체의 세부적인 조율을 마무리하는 마지막 지휘관과 같아서, 거대한 비행기가 이륙하기 직전 엔진을 힘차게 예열하며 날개의 보조 플랩들을 최종 점검하는 움직임과 아주 똑같아.</text:span><text:span/></text:p>
      <text:p text:style-name="P571"><text:span text:style-name="T1029">🧘 안전한 탈출을 위한 자세 전환</text:span><text:span/></text:p>
      <text:p text:style-name="P572"><text:span text:style-name="T1030">[머리의 위치] 아래를 향해 거꾸로 회전 (가장 안전한 탈출 각도 확보)</text:span><text:span/></text:p>
      <text:p text:style-name="P573"><text:span text:style-name="T1031">[두 손의 모양] 가슴 앞으로 다부지게 오므림 (마찰을 줄이고 부피를 최소화)</text:span><text:span/></text:p>
      <text:p text:style-name="P574"><text:span text:style-name="T1032"/><text:span/></text:p>
      <text:p text:style-name="P575"><text:span text:style-name="T1033">이 극적인 자세 변화는 마치 스카이다이버가 상공에서 뛰어내리기 직전, 공기 저항을 최소화하고 부상을 방지하기 위해 온몸을 웅크리는 안전 자세를 취하는 것과 같아.</text:span><text:span/></text:p>
      <text:p text:style-name="P576"><text:span text:style-name="T1034">🚪 드디어 마주하는 새로운 세계의 관문, 산문</text:span><text:span/></text:p>
      <text:list text:style-name="WWNum32" text:continue-numbering="true">
        <text:list-item>
          <text:p text:style-name="P577"><text:span text:style-name="T1035">모든 준비를 마친 생명체는 이제 자궁의 깊은 안쪽을 벗어나 세상으로 연결되는 유일한 통로인 산문을 향해 전진해.</text:span><text:span/></text:p>
        </text:list-item>
        <text:list-item>
          <text:p text:style-name="P578"><text:span text:style-name="T1036">어두운 격납고의 거대한 철문이 스르륵 열리며 마침내 저 멀리 활주로의 눈부신 빛이 보이기 시작하는 순간이지.</text:span><text:span/></text:p>
        </text:list-item>
        <text:list-item>
          <text:p text:style-name="P579"><text:span text:style-name="T1037">거친 윤회의 바다에서 또 하나의 새로운 장을 펼치기 위해, 영혼이 온 힘을 다해 출구 바로 앞까지 바짝 다가선 긴장감 넘치고 장엄한 도약의 단계야.</text:span><text:span/></text:p>
        </text:list-item>
      </text:list>
      <text:p text:style-name="P580"><text:span text:style-name="T1038">📝 핵심 요약</text:span><text:span/></text:p>
      <text:list text:style-name="WWNum32" text:continue-numbering="true">
        <text:list-item>
          <text:p text:style-name="P581"><text:span text:style-name="T1039">모태 안에서 38주가 경과하면 과거의 업에 의해 지분이라는 마지막 생명의 바람이 일어남.</text:span><text:span/></text:p>
        </text:list-item>
        <text:list-item>
          <text:p text:style-name="P582"><text:span text:style-name="T1040">이 바람의 힘으로 태아는 머리를 아래로 향하고 두 손을 오므리는 완벽한 출산 자세를 취함.</text:span><text:span/></text:p>
        </text:list-item>
        <text:list-item>
          <text:p text:style-name="P583"><text:span text:style-name="T1041">모든 신체적 조율을 마친 뒤, 새로운 세상으로 나아가는 출구인 산문을 향해 방향을 잡음.</text:span><text:span/></text:p>
        </text:list-item>
        <text:list-item>
          <text:p text:style-name="P584"><text:span text:style-name="T1042">전생의 인과와 생명 에너지가 결합하여 새로운 탄생을 완벽하게 준비하는 마지막 카운트다운임.</text:span><text:span/></text:p>
        </text:list-item>
      </text:list>
      <text:p text:style-name="P585"><text:span><text:soft-page-break/></text:span><text:span/><text:span/></text:p>
      <text:p text:style-name="P586"><text:span text:style-name="T1043">[🟢 Online Mode | 26.06.05_15:50:37]</text:span><text:span/></text:p>
      <text:p text:style-name="P587"><text:span text:style-name="T1044">139. 출산의 바람과 인생의 다섯 주기</text:span><text:span/></text:p>
      <text:p text:style-name="P588"><text:span text:style-name="T1045">🔑 핵심 키워드: 시선을 아래로 향함, 산도, 탄생, 인생의 주기</text:span><text:span/></text:p>
      <text:p text:style-name="P589"><text:span text:style-name="T1046">🌪️ 출산을 알리는 업력의 바람</text:span><text:span/></text:p>
      <text:p text:style-name="P590"><text:span text:style-name="T1047">엄마 품에서 38주 동안 무사히 자란 아이가 마침내 세상 밖으로 나올 때가 되면, 과거의 업으로부터 생겨난 시선을 아래로 향함이라는 신비로운 바람이 몸속에서 강하게 일어나. 이 바람은 아이를 안전하게 밖으로 밀어내기 위해 작동하는 정교한 에너지 시스템이야. 마치 넓은 우주를 항해하던 우주선이 지구에 착륙할 때가 되어 역추진 로켓을 점화하듯, 보이지 않는 거대한 에너지가 아이를 세상 밖으로 밀어내는 강력한 피스톤 역할을 해주는 거지.</text:span><text:span/></text:p>
      <text:p text:style-name="P591"><text:span text:style-name="T1048">🌊 산도를 향한 다이빙과 위대한 탄생</text:span><text:span/></text:p>
      <text:p text:style-name="P592"><text:span text:style-name="T1049">이 바람의 강력한 힘에 밀려서 자궁 속에 있던 아이는 자연스럽게 머리를 아래로 두고 발을 위로 올린 거꾸로 된 자세를 취하며 산도를 향해 나아가게 돼. 수영 선수가 멋지게 물속으로 뛰어들기 위해 다이빙대 위에서 몸을 웅크리고 머리부터 떨어지는 자세를 잡는 것과 완전히 똑같아. 38주라는 긴 기다림과 준비의 시간이 마침내 끝나고, 아이는 좁은 문을 통과해 마침내 차가운 바깥세상으로 나와 사람들의 눈앞에 온전한 모습을 드러내지.</text:span><text:span/></text:p>
      <text:p text:style-name="P593"><text:span text:style-name="T1050">🎭 세상이라는 무대 위로의 첫걸음</text:span><text:span/></text:p>
      <text:p text:style-name="P594"><text:span text:style-name="T1051">어두운 자궁 속을 벗어나 마침내 세상 밖으로 나온 존재는 이제 모든 사람들의 눈에 보이는 구체적인 물질적 존재가 돼. 암막 커튼 뒤에 숨어 있던 배우가 커튼이 걷히며 화려한 조명이 쏟아지는 무대 한가운데로 걸어 나오는 순간과 같아. 이때부터 아이는 단순히 에너지만으로 존재하던 바르도의 기억을 뒤로하고, 만지고 느낄 수 있는 거친 육체를 가진 인간으로서의 본격적인 탐험을 시작하게 되는 거야.</text:span><text:span/></text:p>
      <text:p text:style-name="P595"><text:span text:style-name="T1052">⏳ 사계절처럼 흘러가는 인생의 다섯 주기</text:span><text:span/></text:p>
      <text:p text:style-name="P596"><text:span text:style-name="T1053">우여곡절 끝에 태어난 영혼은 세상에 발을 디딘 순간부터 동년, 소년, 청년, 장년, 노년이라는 인생의 다섯 주기를 차례대로 밟아가게 돼. 봄에 돋아난 새싹이 여름의 푸른 잎사귀를 거쳐 가을의 단풍과 겨울의 앙상한 나뭇가지로 변해가는 대자연의 사계절 순환과 완벽하게 닮아 있지. 밀교에서는 이 다섯 단계를 거치며 육체가 늙어가는 과정을 허무한 소멸이 아니라, 다음 도약을 위해 소중한 경험을 쌓아가는 위대한 영적 마라톤 코스로 바라본단다.</text:span><text:span/></text:p>
      <text:p text:style-name="P597"><text:span text:style-name="T1054">📝 핵심 요약</text:span><text:span/></text:p>
      <text:list text:style-name="WWNum33" text:continue-numbering="true">
        <text:list-item>
          <text:p text:style-name="P598"><text:span text:style-name="T1055">과거의 업에 의해 시선을 아래로 향함이라는 출산의 바람이 일어남</text:span><text:span/></text:p>
        </text:list-item>
        <text:list-item>
          <text:p text:style-name="P599"><text:span text:style-name="T1056">아이가 머리를 아래로 둔 다이빙 자세로 산도를 통과해 38주 만에 탄생함</text:span><text:span/></text:p>
        </text:list-item>
        <text:list-item>
          <text:p text:style-name="P600"><text:span text:style-name="T1057">세상 밖으로 나온 존재는 사람들의 눈앞에 보이는 구체적인 육체를 얻게 됨</text:span><text:span/></text:p>
        </text:list-item>
        <text:list-item>
          <text:p text:style-name="P601"><text:span text:style-name="T1058">탄생 이후 인간은 동년, 소년, 청년, 장년, 노년의 다섯 주기를 순서대로 밟아감</text:span><text:span/></text:p>
        </text:list-item>
      </text:list>
      <text:p text:style-name="P602"><text:span><text:soft-page-break/></text:span><text:span/><text:span/></text:p>
      <text:p text:style-name="P603"><text:span text:style-name="T1059">140. 심장 최초팔맥의 형성과 생명 에너지의 설계도</text:span><text:span/></text:p>
      <text:p text:style-name="P604"><text:span text:style-name="T1060">🔑 핵심 키워드: 아와두띠, 라싸나, 랄라나, 최초팔맥, 심장 맥도, 생명 에너지</text:span><text:span/></text:p>
      <text:p text:style-name="P605"><text:span text:style-name="T1061">🏗️ 생명의 중심축을 세우는 다섯 가지 기초 공사</text:span><text:span/></text:p>
      <text:p text:style-name="P606"><text:span text:style-name="T1062">가장 먼저 심장이라는 도시에 에너지가 흐를 수 있는 초고속 지하철 노선들이 동시에 깔리기 시작해. 우리 몸의 가장 핵심적인 에너지 도로망인 중맥(아와두띠), 우맥(라싸나), 좌맥(랄라나)의 세 갈래 중심축이 먼저 자리를 잡지. 이와 동시에 동쪽의 삼전맥과 남쪽의 구욕맥이라는 두 개의 주요 노선이 함께 연결되면서 총 </text:span><text:span text:style-name="T1063">다섯 가지의 맥도</text:span><text:span text:style-name="T1064">가 첫 번째 단계로 전원이 켜지듯 한날한시에 모습을 드러내는 거야.</text:span><text:span/></text:p>
      <text:p text:style-name="P607"><text:span text:style-name="T1065">🧭 사방을 완성하는 세 가지 에너지 통로</text:span><text:span/></text:p>
      <text:p text:style-name="P608"><text:span text:style-name="T1066">첫 번째 기초 공사가 끝나면, 곧이어 남은 사방의 방위를 튼튼하게 채워줄 두 번째 에너지 통로들이 동시에 결합해. 중맥 바로 뒤에서 구조를 든든하게 받쳐주는 이마맥을 시작으로, 서쪽의 가녀맥과 북쪽의 맹렬맥이라는 세 개의 맥도가 톱니바퀴처럼 딱 맞아떨어지며 생겨나지. 이 과정은 마치 건물의 메인 기둥을 세운 뒤, 동서남북 사방에 보조 지지대를 단단하게 고정하여 마침내 완벽한 에너지 입체 격자망을 완성하는 것과 같단다.</text:span><text:span/></text:p>
      <text:p text:style-name="P609"><text:span text:style-name="T1067">💓 모든 생명이 시작되는 중심 발전소, 심장</text:span><text:span/></text:p>
      <text:p text:style-name="P610"><text:span text:style-name="T1068">이 여덟 가지 맥도가 몸의 다른 곳이 아닌 왜 하필 '심장'에서 가장 먼저 생겨나는지 그 이유를 아는 것이 중요해. 심장은 우리 몸이라는 거대한 국가의 수도이자, 모든 정보와 생명력이 모이고 흩어지는 중앙 CPU와 같은 곳이기 때문이지. 이 심장에 자리 잡은 최초의 여덟 기둥은 우리가 태어나 평생 숨 쉬고 생각할 수 있도록 만들어주는 원초적인 생명 에너지 발전소의 기초 토대가 되어줘.</text:span><text:span/></text:p>
      <text:p text:style-name="P611"><text:span text:style-name="T1069">🛡️ 구조적 뼈대를 이루는 최초팔맥의 특별한 지위</text:span><text:span/></text:p>
      <text:p text:style-name="P612"><text:span text:style-name="T1070">이렇게 완성된 맥도들을 우리는 심장의 최초팔맥(最初八脈)이라고 불러. 여기서 헷갈리지 말아야 할 점은, 나중에 심장에 생겨나는 여덟 개의 꽃잎 모양 맥도들과는 전혀 다른 차원의 근원적인 뼈대라는 사실이야. 나중에 생기는 맥도들이 방을 나누는 벽지나 인테리어라면, 최초팔맥은 건물 전체가 무너지지 않도록 중심을 꽉 잡아주는 거대한 콘크리트 기둥들과 같아서 생명 창조의 가장 비밀스러운 설계도라고 할 수 있지.</text:span><text:span/></text:p>
      <text:p text:style-name="P613"><text:span text:style-name="T1071">📝 핵심 요약</text:span><text:span/></text:p>
      <text:list text:style-name="WWNum34" text:continue-numbering="true">
        <text:list-item>
          <text:p text:style-name="P614"><text:span text:style-name="T1072">심장에는 가장 먼저 중맥, 우맥, 좌맥과 동쪽의 삼전맥, 남쪽의 구욕맥 등 5개 맥도가 동시에 형성된다.</text:span><text:span/></text:p>
        </text:list-item>
        <text:list-item>
          <text:p text:style-name="P615"><text:span text:style-name="T1073">이어서 중맥과 함께 있는 이마맥, 서쪽의 가녀맥, 북쪽의 맹렬맥 등 3개 맥도가 결합한다.</text:span><text:span/></text:p>
        </text:list-item>
        <text:list-item>
          <text:p text:style-name="P616"><text:span text:style-name="T1074">이 두 단계의 결합을 통해 심장에 생겨난 총 8개의 에너지 통로를 '최초팔맥'이라 부른다.</text:span><text:span/></text:p>
        </text:list-item>
        <text:list-item>
          <text:p text:style-name="P617"><text:span text:style-name="T1075">최초팔맥은 나중에 생기는 지맥들과 달리 생명과 의식을 지탱하는 가장 근원적인 구조적 기둥이다.</text:span><text:span/></text:p>
        </text:list-item>
      </text:list>
      <text:p text:style-name="P618"><text:span><text:soft-page-break/></text:span><text:span/><text:span/></text:p>
      <text:p text:style-name="P619"><text:span text:style-name="T1076">[🟢 Online Mode | 26.06.05_15:58:32]</text:span><text:span/></text:p>
      <text:p text:style-name="P620"><text:span text:style-name="T1077">141. 심장에서 시작되는 72,000개 에너지 맥도의 기하학적 분화</text:span><text:span/></text:p>
      <text:p text:style-name="P621"><text:span text:style-name="T1078">🔑 핵심 키워드: 사방의 4맥, 심장의 근본팔맥, 24맥과 72맥, 72,000 맥도 네트워크</text:span><text:span/></text:p>
      <text:p text:style-name="P622"><text:span text:style-name="T1079">📍 심장의 메인 교차로와 네 갈래의 시작</text:span><text:span/></text:p>
      <text:p text:style-name="P623"><text:span text:style-name="T1080">우리 몸의 미세한 생명 에너지가 펼쳐지는 가장 중심지는 바로 심장이야. 이 심장의 한복판에서 동서남북 사방을 향해 뻗어나가는 4개의 메인 고속도로가 가장 먼저 자리를 잡게 돼. 이것은 거대한 신도시 계획을 세울 때, 도시 중심부에 십자가 모양으로 가장 뼈대가 되는 대형 중심축 대로를 먼저 시원하게 닦아놓는 과정과 아주 똑같아.</text:span><text:span/></text:p>
      <text:p text:style-name="P624"><text:span text:style-name="T1081">🌿 팔방으로 확장되는 여덟 갈래의 근본 줄기</text:span><text:span/></text:p>
      <text:p text:style-name="P625"><text:span text:style-name="T1082">사방으로 뻗은 4개의 대로에서 각각 2개씩 길이 더 정교하게 갈라져 나오면서, 비로소 동서남북과 사방간방을 모두 아우르는 심장의 근본팔맥(根本八脈)이 완성돼. 시각, 후각, 미각, 촉각 같은 인간의 미세한 감각 에너지를 담아내는 이 8개의 줄기는, 튼튼한 나무줄기에서 굵은 가지들이 사방팔방으로 균형 있게 뻗어나가며 전체 나무의 외형을 세우는 첫 번째 진화 단계와 같아.</text:span><text:span/></text:p>
      <text:p text:style-name="P626"><text:span text:style-name="T1083">🔢 기하급수적으로 증폭되는 24맥과 72맥의 중간 도로</text:span><text:span/></text:p>
      <text:p text:style-name="P627"><text:span text:style-name="T1084">이렇게 완성된 8개의 근본 줄기는 명상의 에너지를 온몸으로 전달하기 위해 멈추지 않고 더욱 세분화되기 시작해.</text:span><text:span/></text:p>
      <text:p text:style-name="P628"><text:span text:style-name="T1085">[에너지 도로망의 단계별 확장]</text:span><text:span/></text:p>
      <text:list text:style-name="WWNum35" text:continue-numbering="true">
        <text:list-item>
          <text:p text:style-name="P629"><text:span text:style-name="T1086">1단계:</text:span><text:span text:style-name="T1087"> 근본팔맥에서 각각 3갈래씩 쪼개져 총 </text:span><text:span text:style-name="T1088">24맥</text:span><text:span text:style-name="T1089">의 광역 도로망을 형성함.</text:span><text:span/></text:p>
        </text:list-item>
        <text:list-item>
          <text:p text:style-name="P630"><text:span text:style-name="T1090">2단계:</text:span><text:span text:style-name="T1091"> 24개의 도로에서 다시 각각 3갈래씩 정밀하게 나뉘며 총 </text:span><text:span text:style-name="T1092">72맥</text:span><text:span text:style-name="T1093">의 간선 도로망으로 늘어남.</text:span><text:span/></text:p>
        </text:list-item>
      </text:list>
      <text:p text:style-name="P631"><text:span text:style-name="T1094">이 과정은 메인 인터넷 회선 하나에서 기하급수적으로 여러 개의 서브넷과 공유기 신호가 파생되어 나가듯, 중심 에너지가 온몸의 구석구석으로 부드럽게 퍼지기 위해 스스로를 쪼개며 전압을 낮추는 정교한 변전소 시스템과 아주 비슷해.</text:span><text:span/></text:p>
      <text:p text:style-name="P632"><text:span text:style-name="T1095">🕸️ 온몸을 촘촘히 덮는 72,000개의 미세 실핏줄망</text:span><text:span/></text:p>
      <text:p text:style-name="P633"><text:span text:style-name="T1096">마지막 단계에 이르면 이 72개의 도로망에서 각각 1,000개라는 엄청난 숫자의 미세한 길들이 폭발적으로 터져 나오게 돼. 결국 우리 몸속에는 총 </text:span><text:span text:style-name="T1097">72,000개의 정교한 맥도 네트워크</text:span><text:span text:style-name="T1098">가 단 한 곳의 빈틈도 없이 촘촘하게 깔리게 되지. 커다란 나뭇가지에서 잔가지가 뻗고, 거기서 다시 수천수만 개의 눈부신 나뭇잎 인맥이 갈라져 나와 나무 전체에 영양분을 공급하듯이, 이 미세한 에너지 실핏줄 덕분에 우리는 손가락 끝과 발가락 끝 하나까지 살아 숨 쉬는 생명력을 유지할 수 있는 거야.</text:span><text:span/></text:p>
      <text:p text:style-name="P634"><text:span text:style-name="T1099">📝 핵심 요약</text:span><text:span/></text:p>
      <text:list text:style-name="WWNum35" text:continue-numbering="true">
        <text:list-item>
          <text:p text:style-name="P635"><text:span text:style-name="T1100">심장 중심의 사방 4맥에서 2맥씩 분화하여 감각을 담당하는 근본팔맥을 형성함.</text:span><text:span/></text:p>
        </text:list-item>
        <text:list-item>
          <text:p text:style-name="P636"><text:span text:style-name="T1101">근본팔맥은 3배수의 법칙에 따라 두 번의 정밀 분화를 거쳐 24맥과 72맥으로 확장됨.</text:span><text:span/></text:p>
        </text:list-item>
        <text:list-item>
          <text:p text:style-name="P637"><text:span text:style-name="T1102">최종적으로 72맥에서 각각 1,000개씩 폭발적으로 갈라져 총 72,000개의 미세 맥도망을 완성함.</text:span><text:span/></text:p>
        </text:list-item>
        <text:list-item>
          <text:p text:style-name="P638"><text:span text:style-name="T1103">대도시의 메인 고속도로가 골목길 실핏줄로 뻗어나가듯, 심장에서 온몸으로 에너지가 그물망처럼 연결됨.</text:span><text:span/></text:p>
        </text:list-item>
      </text:list>
      <text:p text:style-name="P639"><text:span><text:soft-page-break/></text:span><text:span/><text:span/></text:p>
      <text:p text:style-name="P640"><text:span text:style-name="T1104">[🟢 Online Mode | 26.06.05_15:59:00]</text:span><text:span/></text:p>
      <text:p text:style-name="P641"><text:span text:style-name="T1105">142. 생명의 바람이 부는 첫 달과 물고기 모양의 시작</text:span><text:span/></text:p>
      <text:p text:style-name="P642"><text:span text:style-name="T1106">🔑 핵심 키워드: 지명풍, 모태 탁생, 첫 달, 거친 에너지, 물고기 모양</text:span><text:span/></text:p>
      <text:p text:style-name="P643"><text:span text:style-name="T1107">🌱 모태에서 시작되는 생명의 첫 설계도</text:span><text:span/></text:p>
      <text:p text:style-name="P644"><text:span text:style-name="T1108">어머니의 자궁이라는 따뜻한 보금자리에 영혼이 처음 자리를 잡는 첫 달은, 마치 아무것도 없는 도화지에 아주 미세한 연필선으로 첫 밑그림을 그리는 단계와 같아. 이 시기는 겉보기에는 아주 조용하고 작은 점에 불과하지만, 내면에서는 새로운 우주를 만들기 위한 거대한 에너지가 요동치기 시작하는 생명의 출발점이지. 스마트폰을 처음 샀을 때 전원 버튼을 누르면 내부의 보이지 않는 미세한 칩들이 먼저 깨어나는 것처럼, 우리 존재도 보이지 않는 미세한 생명의 숨결로부</text:span><text:span text:style-name="T1109">터 위대한 여정을 시작하는 거야.</text:span><text:span/></text:p>
      <text:p text:style-name="P645"><text:span text:style-name="T1110">💨 미세한 바람에서 거친 에너지로의 진화</text:span><text:span/></text:p>
      <text:p text:style-name="P646"><text:span text:style-name="T1111">이 첫 달 동안 가장 핵심적인 변화는 극도로 미세했던 지명풍에서 거친 지명풍이 발생하는 과정이야. 지명풍은 우리의 생명을 지탱하고 유지하는 근원본적인 바람을 뜻하지. 처음에는 형체를 알아보기 힘들 정도로 미세하고 부드러운 바람이었지만, 시간이 지나면서 점차 눈에 보이고 만져지는 신체를 형성할 수 있을 만큼 강하고 거친 에너지로 진화하게 돼. 마치 깊은 산속에서 시작된 작은 한 줄기 바람이 넓은 평야로 나오면서 거대한 돌풍으로 성장하여 맷돌을 돌릴 수 있는</text:span><text:span text:style-name="T1112"> 강력한 힘을 갖게 되는 것과 아주 똑같은 이치란다.</text:span><text:span/></text:p>
      <text:p text:style-name="P647"><text:span text:style-name="T1113">🐟 바다를 헤엄치는 물고기 모양의 신비</text:span><text:span/></text:p>
      <text:p text:style-name="P648"><text:span text:style-name="T1114">그렇게 생명의 바람이 점점 거칠고 단단해지면서, 자궁 속 생명체는 아주 흥미로운 외형을 갖추게 되는데 바로 귀여운 물고기 모양이야. 우리 인간이 먼 옛날 바다에서 시작되어 진화해 온 역사를 모태 안에서 아주 짧은 시간 동안 그대로 재현하는 것 같아서 참 신비롭지. 조각가가 거대한 대리석을 깎아 사람 상을 만들 때 처음에는 세부적인 손가락이나 발가락을 파지 않고 전체적인 덩어리만 둥글게 다듬는 것처럼, 자연도 우리 몸을 만들 때 가장 부드럽고 유연한 물고기</text:span><text:span text:style-name="T1115">의 형태를 빌려 첫 신체적 기반을 다지는 셈이야.</text:span><text:span/></text:p>
      <text:p text:style-name="P649"><text:span text:style-name="T1116">🌊 생명의 바다에서 도약할 준비</text:span><text:span/></text:p>
      <text:p text:style-name="P650"><text:span text:style-name="T1117">어머니의 양수라는 따뜻한 바다 안에서 물고기 모양으로 머무는 이 짧은 시기는, 앞으로 인간이라는 온전한 존재로 도약하기 위한 가장 완벽한 준비 기간이야. 거친 지명풍이라는 에너지가 몸의 구석구석으로 흐를 길을 닦아주면서, 뼈가 생기고 살이 붙을 기초적인 통로를 완성해 나가지. 작은 물고기가 먼바다를 향해 헤엄칠 준비를 하듯, 우리 영혼도 육체라는 든든한 잠수함을 입고 이 세상이라는 거대한 무대로 나아갈 첫 단추를 꿴 단계라고 이해하면 돼.</text:span><text:span/></text:p>
      <text:p text:style-name="P651"><text:span text:style-name="T1118">📝 핵심 요약</text:span><text:span/></text:p>
      <text:list text:style-name="WWNum36" text:continue-numbering="true">
        <text:list-item>
          <text:p text:style-name="P652"><text:span text:style-name="T1119">모태에 처음 착상한 첫 달은 생명의 밑그림을 그리는 기초적인 단계이다.</text:span><text:span/></text:p>
        </text:list-item>
        <text:list-item>
          <text:p text:style-name="P653"><text:span text:style-name="T1120">극도로 미세했던 지명풍이 점차 신체를 형성할 수 있는 거친 지명풍으로 진화한다.</text:span><text:span/></text:p>
        </text:list-item>
        <text:list-item>
          <text:p text:style-name="P654"><text:span text:style-name="T1121">생명의 바람이 발달하면서 자궁 속 생명체는 물고기와 유사한 초기 형태를 띤다.</text:span><text:span/></text:p>
        </text:list-item>
        <text:list-item>
          <text:p text:style-name="P655"><text:span text:style-name="T1122">물고기 모양의 신체는 향후 온전한 인간의 신체 구조로 발전하기 위한 필수적인 기반이 된다.</text:span><text:span/></text:p>
        </text:list-item>
      </text:list>
      <text:p text:style-name="P656"><text:span><text:soft-page-break/></text:span><text:span/><text:span/></text:p>
      <text:p text:style-name="P657"><text:span text:style-name="T1123">[🔴 Offline Mode | 26.06.05_15:58:45]</text:span><text:span/></text:p>
      <text:p text:style-name="P658"><text:span text:style-name="T1124">143. 하행풍의 발생과 거북이 모양의 다섯 돌기 형성</text:span><text:span/></text:p>
      <text:p text:style-name="P659"><text:span text:style-name="T1125">🔑 핵심 키워드: 지명풍, 하행풍, 둘째 달, 다섯 돌기, 거북이 형상</text:span><text:span/></text:p>
      <text:p text:style-name="P660"><text:span text:style-name="T1126">🌬️ 지명풍에서 분화되는 새로운 생명의 바람</text:span><text:span/></text:p>
      <text:p text:style-name="P661"><text:span text:style-name="T1127">생명이 자궁 안에서 자라나는 둘째 달이 되면, 생명을 직접 유지하던 거친 지명풍에서 새로운 기운이 뻗어 나오게 돼. 바로 아래로 내려가는 바람인 하행풍이 발생하는 단계지. 이것은 마치 커다란 나무의 중심 줄기에서 새로운 계절을 맞아 튼튼한 곁가지가 힘차게 뻗어 나오는 과정과 아주 비슷해. 중심을 잡고 있던 거대한 생명 에너지가 스스로를 분화시켜, 신체의 아랫부분을 구성하고 발달시키기 위한 구체적인 움직임을 시작하는 신비로운 순간이란다.</text:span><text:span/></text:p>
      <text:p text:style-name="P662"><text:span text:style-name="T1128">🐢 몸 위로 돋아나는 다섯 가지 신비로운 돌기</text:span><text:span/></text:p>
      <text:p text:style-name="P663"><text:span text:style-name="T1129">이 하행풍이 아래로 이동하며 밀어내는 강한 에너지의 힘에 의해서, 자궁 속의 조그만 생명체에게는 놀라운 외형적 변화가 일어나게 돼. 몸의 중심부에서 다섯 개의 선명한 돌기가 겉으로 불거져 나오기 시작하는 거야. 이는 부드러운 밀가루 반죽을 손으로 꾹 쥐었을 때 손가락 사이로 반죽이 쏙쏙 솟아오르는 모습이나, 봄날에 단단한 대지를 뚫고 새싹들이 동시에 고개를 내미는 풍경과 닮아 있어. 이 다섯 돌기는 장차 머리와 양팔, 그리고 양다리로 자라날 소중한 생명의</text:span><text:span text:style-name="T1130"> 싹이란다.</text:span><text:span/></text:p>
      <text:p text:style-name="P664"><text:span text:style-name="T1131">🛡️ 거북이를 닮아가는 초기 배아의 안정적 구조</text:span><text:span/></text:p>
      <text:p text:style-name="P665"><text:span text:style-name="T1132">다섯 개의 돌기가 돋아난 초기 생명체의 전체적인 외형은 마치 바다를 헤엄치는 거북이의 모양을 고스란히 닮게 돼. 등껍질을 중심으로 머리와 네 발을 사방으로 쏙 내밀고 있는 아주 귀엽고도 완벽한 대칭 구조를 이루는 거지. 앞선 달에 물고기 모양으로 길게 늘어났던 에너지가 이제는 중심을 향해 단단하게 뭉치며, 외부의 충격으로부터 스스로를 가장 잘 보호할 수 있는 안정적인 구형과 방어벽을 갖추어 나가는 생명의 놀라운 지혜를 보여주는 거란다.</text:span><text:span/></text:p>
      <text:p text:style-name="P666"><text:span text:style-name="T1133">🌌 형태를 빚어내는 보이지 않는 기운의 힘</text:span><text:span/></text:p>
      <text:p text:style-name="P667"><text:span text:style-name="T1134">이 단계는 눈에 보이지 않는 미세한 바람의 기운들이 어떻게 단단한 물질적 육체를 정교하게 디자인하는지 잘 보여주는 관문이야. 거칠고 투박한 흙덩어리가 도예가의 보이지 않는 손길과 바람을 따라 아름다운 도자기로 빚어지듯, 하행풍의 정교한 흐름이 세포들을 밀어내고 배치하며 거북이 같은 형태를 완성해 나가는 거지. 보이지 않는 영적인 에너지가 눈에 보이는 생명이라는 구체적인 물질 구조를 창조해 나가는 거룩한 설계도라고 할 수 있어.</text:span><text:span/></text:p>
      <text:p text:style-name="P668"><text:span text:style-name="T1135">📝 핵심 요약</text:span><text:span/></text:p>
      <text:list text:style-name="WWNum37" text:continue-numbering="true">
        <text:list-item>
          <text:p text:style-name="P669"><text:span text:style-name="T1136">임신 둘째 달이 되면 생명을 유지하던 거친 지명풍에서 아래로 향하는 하행풍이 새롭게 발생함.</text:span><text:span/></text:p>
        </text:list-item>
        <text:list-item>
          <text:p text:style-name="P670"><text:span text:style-name="T1137">하행풍이 만드는 에너지의 힘에 의해 자궁 속 생명체의 몸에 다섯 개의 돌기가 불거져 나옴.</text:span><text:span/></text:p>
        </text:list-item>
        <text:list-item>
          <text:p text:style-name="P671"><text:span text:style-name="T1138">이 시기의 생명체는 머리와 사지의 경계가 돋아나 전체적으로 거북이와 같은 형상을 띰.</text:span><text:span/></text:p>
        </text:list-item>
        <text:list-item>
          <text:p text:style-name="P672"><text:span text:style-name="T1139">보이지 않는 기운의 분화가 구체적인 신체 기관의 형태를 정교하게 디자인하는 과정임.</text:span><text:span/></text:p>
        </text:list-item>
      </text:list>
      <text:p text:style-name="P673"><text:span><text:soft-page-break/></text:span><text:span/><text:span/></text:p>
      <text:p text:style-name="P674"><text:span text:style-name="T1140">144. 셋째 달의 에너지 대전환과 멧돼지 형상</text:span><text:span/></text:p>
      <text:p text:style-name="P675"><text:span text:style-name="T1141">🔑 핵심 키워드: 셋째 달, 하행풍, 등주풍(싸마나), 멧돼지 형상, 에너지 굴곡</text:span><text:span/></text:p>
      <text:p text:style-name="P676"><text:span text:style-name="T1142">🌪️ 등주풍의 발생과 에너지 엔진 가동</text:span><text:span/></text:p>
      <text:p text:style-name="P677"><text:span text:style-name="T1143">임신 셋째 달이 되면 태아의 내면에서 아주 중요한 에너지의 대전환이 일어나. 기존에 몸 아래쪽으로 흐르며 배설과 안정을 담당하던 거대한 '하행풍'이라는 기운 속에서, 배꼽 부위에 집중적으로 머무는 '등주풍(싸마나)'이라는 새로운 기운이 분화되어 나오게 되지. 이건 마치 든든하게 다져진 건물의 지하 기초에서 건물 전체에 온기를 공급하는 중앙 보일러 시스템이 가동되기 시작하는 것과 같아. 이 등주풍은 앞으로 태아의 소화와 대사, 영양 공급을 총괄하는 핵심 엔</text:span><text:span text:style-name="T1144">진 역할을 맡게 된단다.</text:span><text:span/></text:p>
      <text:p text:style-name="P678"><text:span text:style-name="T1145">🐗 상부의 굴곡과 멧돼지 형상의 태아</text:span><text:span/></text:p>
      <text:p text:style-name="P679"><text:span text:style-name="T1146">이 시기에 자궁 속 생명체는 상반신이 살짝 앞으로 구부러지면서 마치 멧돼지와 흡사한 형태를 띠게 돼. 아직 뼈대가 완전히 곧게 서지 않고 머리와 가슴 부분이 동그랗게 말려 있는 역동적인 발달 단계지. 단단한 껍질 속에서 몸을 웅크린 채 힘을 응축하고 있는 야생의 생명력처럼, 멧돼지의 굳건하고 강인한 형상을 빌려 육체의 중심을 단단하게 다져가는 중이라고 이해하면 아주 직관적이야.</text:span><text:span/></text:p>
      <text:p text:style-name="P680"><text:span text:style-name="T1147">🔥 바람의 압력이 빚어내는 형태의 신비</text:span><text:span/></text:p>
      <text:p text:style-name="P681"><text:span text:style-name="T1148">재미있는 점은 이러한 멧돼지 같은 외형의 변화가 단순히 우연히 생기는 게 아니라는 사실이야. 배꼽 주위에서 등주풍이라는 강한 에너지가 소용돌이치며 집중되다 보니, 그 기운의 압력과 흐름에 따라 자연스럽게 상반신이 안으로 말려 들어가는 설계도가 실현되는 거지. 도예가가 물레를 돌릴 때 손끝의 힘과 방향에 따라 진흙의 모양이 둥글게 휘어지듯, 미세한 바람의 에너지가 태아의 물리적인 형상을 정밀하게 빚어내는 경이로운 순간이란다.</text:span><text:span/></text:p>
      <text:p text:style-name="P682"><text:span text:style-name="T1149">📝 핵심 요약</text:span><text:span/></text:p>
      <text:list text:style-name="WWNum38" text:continue-numbering="true">
        <text:list-item>
          <text:p text:style-name="P683"><text:span text:style-name="T1150">임신 셋째 달에는 아래로 흐르던 하행풍에서 배꼽 부위의 소화 엔진인 등주풍(싸마나)이 새롭게 발생해.</text:span><text:span/></text:p>
        </text:list-item>
        <text:list-item>
          <text:p text:style-name="P684"><text:span text:style-name="T1151">이 시기의 태아는 상반신이 부드럽게 앞으로 굽어지면서 강인한 멧돼지를 닮은 독특한 형상을 띠게 돼.</text:span><text:span/></text:p>
        </text:list-item>
        <text:list-item>
          <text:p text:style-name="P685"><text:span text:style-name="T1152">내면의 미세한 기운(바람)의 소용돌이가 육체의 구체적인 형태를 빚어내는 밀교적 신체 발달의 핵심 단계야.</text:span><text:span/></text:p>
        </text:list-item>
      </text:list>
      <text:p text:style-name="P686"><text:span><text:soft-page-break/></text:span><text:span/><text:span/></text:p>
      <text:p text:style-name="P687"><text:span text:style-name="T1153">145. 넷째 달의 상행풍 발현과 사자의 신체 형성</text:span><text:span/></text:p>
      <text:p text:style-name="P688"><text:span text:style-name="T1154">🔑 핵심 키워드: 넷째 달, 등주풍, 우다나 상행풍, 사자 모양 형상</text:span><text:span/></text:p>
      <text:p text:style-name="P689"><text:span text:style-name="T1155">🦁 넷째 달에 일어나는 폭발적인 상체 발달</text:span><text:span/></text:p>
      <text:p text:style-name="P690"><text:span text:style-name="T1156">태아가 모태에서 네 번째 달을 맞이하면 상체가 눈에 띄게 발달하면서 마치 당당한 사자의 모습을 닮아가게 돼. 비유하자면 조그만 아기 동물이 자라나면서 점차 어깨가 벌어지고 맹수의 의젓한 골격을 갖추기 시작하는 성장 과정과 아주 비슷하지. 이 시기부터 생명체는 단순히 세포가 뭉쳐 있는 단계를 넘어, 위풍당당한 생명의 외형적 틀을 본격적으로 완성하기 시작해.</text:span><text:span/></text:p>
      <text:p text:style-name="P691"><text:span text:style-name="T1157">🌋 등주풍의 불길에서 솟구치는 우다나 상행풍</text:span><text:span/></text:p>
      <text:p text:style-name="P692"><text:span text:style-name="T1158">이 놀라운 신체 변화를 이끄는 원동력은 몸의 중심을 유지하던 등주풍에서 우다나라 부르는 새로운 상행풍이 뿜어져 나오기 때문이야.</text:span><text:span/></text:p>
      <text:list text:style-name="WWNum39" text:continue-numbering="true">
        <text:list-item>
          <text:p text:style-name="P693"><text:span text:style-name="T1159">등주풍의 역할: 몸의 중심에서 불처럼 에너지를 성숙시키는 베이스 캠프</text:span><text:span/></text:p>
        </text:list-item>
        <text:list-item>
          <text:p text:style-name="P694"><text:span text:style-name="T1160">우다나 상행풍의 발현: 등주풍의 뜨거운 열기를 바탕으로 위를 향해 강력하게 솟구치는 바람</text:span><text:span/></text:p>
        </text:list-item>
        <text:list-item>
          <text:p text:style-name="P695"><text:span text:style-name="T1161">이것은 마치 활활 타오르는 아궁이의 불길 위로 뜨거운 열풍이 솟구쳐 오르거나, 강력한 연료를 태운 로켓이 하늘을 향해 엄청난 추진력을 뿜어내며 날아오르는 물리적 현상과 똑같아. 위로 향하는 에너지가 강력하게 작동하면서 태아의 상반신을 구성하는 뼈와 근육을 힘차게 밀어 올리는 거지.</text:span><text:span/></text:p>
        </text:list-item>
      </text:list>
      <text:p text:style-name="P696"><text:span text:style-name="T1162">📊 생명 에너지의 흐름과 신체 변화</text:span><text:span/></text:p>
      <table:table table:style-name="ta4">
        <table:table-columns>
          <table:table-column table:style-name="co10"/>
          <table:table-column table:style-name="co11"/>
          <table:table-column table:style-name="co12"/>
        </table:table-columns>
        <table:table-row table:style-name="ro10" table:default-cell-style-name="ce31">
          <table:table-cell table:style-name="ce32">
            <text:p text:style-name="P697"><text:span text:style-name="T1163">에너지 구분</text:span><text:span/></text:p>
          </table:table-cell>
          <table:table-cell table:style-name="ce33">
            <text:p text:style-name="P698"><text:span text:style-name="T1164">신체적 발현 상태</text:span><text:span/></text:p>
          </table:table-cell>
          <table:table-cell table:style-name="ce34">
            <text:p text:style-name="P699"><text:span text:style-name="T1165">직관적 변화 비유</text:span><text:span/></text:p>
          </table:table-cell>
        </table:table-row>
        <table:table-row table:style-name="ro11" table:default-cell-style-name="ce31">
          <table:table-cell table:style-name="ce35">
            <text:p text:style-name="P700"><text:span text:style-name="T1166">기반이 되는 등주풍</text:span><text:span/></text:p>
          </table:table-cell>
          <table:table-cell table:style-name="ce36">
            <text:p text:style-name="P701"><text:span text:style-name="T1167">태내 영양을 소화하고 생명을 익히는 중심축</text:span><text:span/></text:p>
          </table:table-cell>
          <table:table-cell table:style-name="ce37">
            <text:p text:style-name="P702"><text:span text:style-name="T1168">용광로에서 쇳물을 단단하게 제련하는 기초 공정</text:span><text:span/></text:p>
          </table:table-cell>
        </table:table-row>
        <table:table-row table:style-name="ro12" table:default-cell-style-name="ce31">
          <table:table-cell table:style-name="ce38">
            <text:p text:style-name="P703"><text:span text:style-name="T1169">솟구치는 상행풍</text:span><text:span/></text:p>
          </table:table-cell>
          <table:table-cell table:style-name="ce39">
            <text:p text:style-name="P704"><text:span text:style-name="T1170">상반신을 밀어 올려 뼈와 가슴을 확장함</text:span><text:span/></text:p>
          </table:table-cell>
          <table:table-cell table:style-name="ce40">
            <text:p text:style-name="P705"><text:span text:style-name="T1171">분수대에서 물줄기가 위로 세차게 뻗어 나가는 모양</text:span><text:span/></text:p>
          </table:table-cell>
        </table:table-row>
        <table:table-row table:style-name="ro13" table:default-cell-style-name="ce31">
          <table:table-cell table:style-name="ce41">
            <text:p text:style-name="P706"><text:span text:style-name="T1172">사자 모양의 형상</text:span><text:span/></text:p>
          </table:table-cell>
          <table:table-cell table:style-name="ce42">
            <text:p text:style-name="P707"><text:span text:style-name="T1173">가슴과 어깨가 발달하여 당당한 윤곽을 이룸</text:span><text:span/></text:p>
          </table:table-cell>
          <table:table-cell table:style-name="ce43">
            <text:p text:style-name="P708"><text:span text:style-name="T1174">초원의 왕인 사자가 앞발을 딛고 가슴을 편 자세</text:span><text:span/></text:p>
          </table:table-cell>
        </table:table-row>
      </table:table>
      <text:p text:style-name="P709"><text:span text:style-name="T1175">👑 초원의 왕을 닮은 당당한 윤곽</text:span><text:span/></text:p>
      <text:p text:style-name="P710"><text:span text:style-name="T1176">상행풍의 강력한 에너지가 위쪽으로 집중되면서 태아의 가슴과 어깨 부위는 아래쪽에 비해 훨씬 넓고 튼튼하게 자라나게 돼. 이 독특한 체형은 영적인 눈으로 보았을 때 마치 털갈이를 마친 사자가 바위 위에서 당당하게 가슴을 펴고 앉아 있는 구조와 완벽하게 부합하지. 생명이 가진 가장 찬란하고 역동적인 힘이 상체라는 물리적 공간을 통해 밖으로 드러나는 신비로운 순간이야.</text:span><text:span/></text:p>
      <text:p text:style-name="P711"><text:span text:style-name="T1177">📝 핵심 요약</text:span><text:span/></text:p>
      <text:list text:style-name="WWNum39" text:continue-numbering="true">
        <text:list-item>
          <text:p text:style-name="P712"><text:span text:style-name="T1178">모태 속에서 네 번째 달을 맞이한 태아는 상반신이 집중적으로 발달하는 전환기를 겪음.</text:span><text:span/></text:p>
        </text:list-item>
        <text:list-item>
          <text:p text:style-name="P713"><text:span text:style-name="T1179">몸을 성숙시키던 등주풍의 에너지로부터 위로 솟구치는 성질을 가진 우다나 상행풍이 발생함.</text:span><text:span/></text:p>
        </text:list-item>
        <text:list-item>
          <text:p text:style-name="P714"><text:span text:style-name="T1180">상행풍이 위쪽으로 강한 추진력을 공급하면서 태아의 가슴과 어깨가 넓어지는 신체 확장이 일어남.</text:span><text:span/></text:p>
        </text:list-item>
        <text:list-item>
          <text:p text:style-name="P715"><text:span text:style-name="T1181">이 에너지 흐름의 결과로 태아는 초원의 왕인 사자가 가슴을 편 듯한 당당한 형상을 취하게 됨.</text:span><text:span/></text:p>
        </text:list-item>
      </text:list>
      <text:p text:style-name="P716"><text:span><text:soft-page-break/></text:span><text:span/><text:span/></text:p>
      <text:p text:style-name="P717"><text:span text:style-name="T1182">[🟢 Online Mode | 26.06.05_15:59:04]</text:span><text:span/></text:p>
      <text:p text:style-name="P718"><text:span text:style-name="T1183">146. 다섯 번째 달의 성장과 작은 인간의 형성</text:span><text:span/></text:p>
      <text:p text:style-name="P719"><text:span text:style-name="T1184">🔑 핵심 키워드: 다섯째 달, 상행풍, 편행풍, 브야나, 소인의 모습</text:span><text:span/></text:p>
      <text:p text:style-name="P720"><text:span text:style-name="T1185">💨 다섯 번째 달의 시작과 상행풍의 진화</text:span><text:span/></text:p>
      <text:p text:style-name="P721"><text:span text:style-name="T1186">태아가 어머니의 자궁 안에서 다섯 번째 달을 맞이하면, 신체 내부의 에너지 시스템은 또 한 번 놀라운 업그레이드를 시작해. 이전 단계까지 위쪽으로 거침없이 기운을 밀어 올리던 상행풍이라는 에너지가 바탕이 되어 새로운 변화를 이끌어내지. 이것은 마치 건물을 지을 때 수직으로 단단한 기둥을 튼튼하게 세운 뒤에, 그 기둥을 중심으로 가로 지지대와 벽면을 덧붙여 본격적인 방의 형태를 만들어가는 과정과 똑같아. 위를 향하던 에너지가 이제는 온몸으로 뻗어나갈 준비를</text:span><text:span text:style-name="T1187"> 마치는 시기야.</text:span><text:span/></text:p>
      <text:p text:style-name="P722"><text:span text:style-name="T1188">🌊 몸 전체를 흐르는 편행풍 브야나의 탄생</text:span><text:span/></text:p>
      <text:p text:style-name="P723"><text:span text:style-name="T1189">이 시기에는 상행풍의 에너지로부터 브야나라고 불리는 몸 전체를 감싸는 편행풍이 새롭게 발생하게 돼. 편행풍은 이름 그대로 우리 몸의 구석구석, 손가락 발가락 끝까지 단 한 곳도 빠짐없이 고르게 순환하는 미세한 생명의 바람이야. 거대한 정수장에서 출발한 깨끗한 물이 촘촘한 수도관을 타고 도시의 모든 가정집 주방과 욕실까지 구석구석 막힘없이 흘러 들어가는 완벽한 급수 시스템이 드디어 가동되는 셈이지.</text:span><text:span/></text:p>
      <text:p text:style-name="P724"><text:span text:style-name="T1190">👶 자궁 속에 나타난 작은 인간 소인의 모습</text:span><text:span/></text:p>
      <text:p text:style-name="P725"><text:span text:style-name="T1191">편행풍이 온몸에 생명력을 불어넣으면서 자궁 속의 생명체는 마침내 소인, 즉 아주 작은 인간의 형태를 완벽하게 갖추게 돼. 이전까지는 세포들이 뭉쳐 있는 다소 모호한 형태였다면, 이제는 머리, 몸통, 팔다리가 제자리를 잡아 멀리서 보아도 한눈에 사람임을 알아볼 수 있는 정밀한 미니어처 인형처럼 변하는 거야. 찰흙으로 대강의 덩어리를 뭉쳐 놓았던 조각가가 마침내 섬세한 손길로 이목구비와 손발을 다듬어 하나의 완성된 작품을 탄생시킨 것과 같단다.</text:span><text:span/></text:p>
      <text:p text:style-name="P726"><text:span text:style-name="T1192">⚙️ 미세 에너지와 물질 신체의 아름다운 합작품</text:span><text:span/></text:p>
      <text:p text:style-name="P727"><text:span text:style-name="T1193">결국 다섯 번째 달에 일어나는 변화는 보이지 않는 미세한 에너지인 바람과 눈에 보이는 육체가 얼마나 유기적으로 연결되어 있는지를 잘 보여주는 증거야. 편행풍이라는 생명의 바람이 온몸을 감싸며 정밀하게 순환해 주었기 때문에, 비로소 세포들이 길을 잃지 않고 인간의 형상으로 아름답게 자라날 수 있었던 거지. 우주의 정교한 에너지가 세포라는 벽돌을 하나하나 제자리에 배치하여 조화로운 생명의 성전을 완성해 가는 경이로운 순간이란다.</text:span><text:span/></text:p>
      <text:p text:style-name="P728"><text:span text:style-name="T1194">📝 핵심 요약</text:span><text:span/></text:p>
      <text:list text:style-name="WWNum40" text:continue-numbering="true">
        <text:list-item>
          <text:p text:style-name="P729"><text:span text:style-name="T1195">다섯 번째 달에는 상행풍 에너지가 진화하여 새로운 변화의 기반이 된다.</text:span><text:span/></text:p>
        </text:list-item>
        <text:list-item>
          <text:p text:style-name="P730"><text:span text:style-name="T1196">몸 전체를 조화롭게 감싸고 순환하는 미세한 생명의 바람인 편행풍 브야나가 발생한다.</text:span><text:span/></text:p>
        </text:list-item>
        <text:list-item>
          <text:p text:style-name="P731"><text:span text:style-name="T1197">편행풍의 유기적인 인도에 따라 태아는 명확한 인간의 형태인 소인의 모습을 갖춘다.</text:span><text:span/></text:p>
        </text:list-item>
        <text:list-item>
          <text:p text:style-name="P732"><text:span text:style-name="T1198">보이지 않는 에너지의 흐름과 물질적 신체가 완벽하게 결합하여 생명의 조화를 이룬다.</text:span><text:span/></text:p>
        </text:list-item>
      </text:list>
      <text:p text:style-name="P733"><text:span><text:soft-page-break/></text:span><text:span/><text:span/></text:p>
      <text:p text:style-name="P734"><text:span text:style-name="T1199">[🟢 Online Mode | 26.06.05_15:59:10]</text:span><text:span/></text:p>
      <text:p text:style-name="P735"><text:span text:style-name="T1200">147. 👁️ 눈의 바람과 땅 원소의 깨어남</text:span><text:span/></text:p>
      <text:p text:style-name="P736"><text:span text:style-name="T1201">🔑 핵심 키워드: 여섯째 달, 유행풍, 땅 원소, 시각 에너지</text:span><text:span/></text:p>
      <text:p text:style-name="P737"><text:span text:style-name="T1202">어머니의 태중에서 여섯째 달을 맞이하면 태아의 몸에는 눈으로 흐르는 미세한 에너지인 유행풍이라는 특별한 생명의 바람이 새롭게 피어나기 시작해. 이건 마치 어두운 방에 드디어 최첨단 카메라의 렌즈가 장착되고, 그 렌즈에 전원이 공급되면서 빛을 받아들일 준비를 마치는 과정과 아주 비슷해. 아직 눈을 번쩍 뜨고 세상을 바라보는 것은 아니지만, 시각을 담당하는 미세한 신경망과 에너지 통로가 활성화되면서 세상을 인식할 준비를 마치는 영적인 도약이 일어나는 거지.</text:span><text:span/></text:p>
      <text:p text:style-name="P738"><text:span text:style-name="T1203">이와 동시에 태아의 내면에서는 가장 단단하고 안정적인 성질을 지닌 땅 원소가 본격적으로 결합하고 발달하기 시작해. 지금까지 부드러운 살집을 만들며 형태를 잡아왔다면, 이제는 그 살집을 든든하게 지탱해 줄 콘크리트 골조를 붓고 단단한 기둥을 세우는 단계라고 볼 수 있어. 땅의 기운이 몸 안에서 굳건하게 자리를 잡아야만 비로소 흔들리지 않는 육체의 구조가 완성되고, 앞으로 마주할 외부 세계의 물리적인 압력을 온전히 견뎌낼 수 있는 힘이 생기게 돼.</text:span><text:span/></text:p>
      <text:p text:style-name="P739"><text:span text:style-name="T1204">이렇게 시각을 주도하는 바람의 기운과 신체를 다지는 땅의 기운이 함께 일어나는 것은 참으로 신비로운 조화야. 마치 건물의 창문을 크게 내어 바깥 풍경을 담을 준비를 하는 동시에, 그 창문이 흔들리지 않도록 벽면을 단단한 돌로 채워 넣는 정밀한 건축 공사가 동시에 진행되는 것과 같거든. 이 두 가지 요소가 완벽하게 결합하면서 태아는 단순히 자라나는 세포 덩어리가 아니라, 세상을 보고 느낄 수 있는 온전한 지각 능력을 갖춘 존재로 한 단계 더 진화하게 되는 </text:span><text:span text:style-name="T1205">거야.</text:span><text:span/></text:p>
      <text:p text:style-name="P740"><text:span text:style-name="T1206">밀교 수행의 관점에서 보면, 여섯째 달에 일어나는 이 미세한 에너지의 형성은 우리가 훗날 눈을 통해 세상을 바라보고 공성을 관조할 수 있는 물질적, 정신적 기반이 바로 이때 만들어짐을 의미해. 육체의 단단함과 감각의 통로가 조화롭게 깨어나는 이 정밀한 순간이 있기에, 우리는 태어나서 수행을 통해 마음의 눈을 뜨고 궁극의 진리를 마주할 수 있는 고귀한 기회를 얻게 되는 거지.</text:span><text:span/></text:p>
      <text:p text:style-name="P741"><text:span text:style-name="T1207">📝 핵심 요약</text:span><text:span/></text:p>
      <text:list text:style-name="WWNum41" text:continue-numbering="true">
        <text:list-item>
          <text:p text:style-name="P742"><text:span text:style-name="T1208">여섯째 달에는 눈으로 흐르는 미세한 생명의 바람인 유행풍이 발생한다.</text:span><text:span/></text:p>
        </text:list-item>
        <text:list-item>
          <text:p text:style-name="P743"><text:span text:style-name="T1209">시각 기관의 통로가 활성화되면서 외부 세상을 인식할 내면의 준비를 시작한다.</text:span><text:span/></text:p>
        </text:list-item>
        <text:list-item>
          <text:p text:style-name="P744"><text:span text:style-name="T1210">신체를 단단하게 지탱해 주는 근원적인 땅 원소가 본격적으로 형성된다.</text:span><text:span/></text:p>
        </text:list-item>
        <text:list-item>
          <text:p text:style-name="P745"><text:span text:style-name="T1211">단단한 신체 구조와 미세한 감각 에너지가 결합하여 온전한 지각의 바탕을 만든다.</text:span><text:span/></text:p>
        </text:list-item>
      </text:list>
      <text:p text:style-name="P746"><text:span><text:soft-page-break/></text:span><text:span/><text:span/></text:p>
      <text:p text:style-name="P747"><text:span text:style-name="T1212">148. 일곱째 달에 열리는 청각의 문과 생명의 물결</text:span><text:span/></text:p>
      <text:p text:style-name="P748"><text:span text:style-name="T1213">🔑 핵심 키워드: 일곱째 달, 승행풍, 귀의 통로, 물 원소</text:span><text:span/></text:p>
      <text:p text:style-name="P749"><text:span text:style-name="T1214">👂 소리의 세계를 향해 열리는 귀의 게이트</text:span><text:span/></text:p>
      <text:p text:style-name="P750"><text:span text:style-name="T1215">어머니 배 속에서 보낸 시간도 어느덧 일곱째 달에 접어들었어. 이 시기가 되면 태아의 몸속에서는 아주 특별하고 정교한 감각 기관인 귀의 통로가 완벽하게 자리를 잡기 시작하지. 지금까지는 외부 세상과 소통할 방법이 거의 없었다면, 이제는 굳게 닫혀 있던 청각의 문이 스르륵 열리며 엄마의 심장 소리나 외부의 은은한 소리들을 받아들일 준비를 마치는 단계야.</text:span><text:span/></text:p>
      <text:p text:style-name="P751"><text:span text:style-name="T1216">🌬️ 에너지의 고속 주행을 이끄는 승행풍</text:span><text:span/></text:p>
      <text:p text:style-name="P752"><text:span text:style-name="T1217">귀의 통로가 열릴 때 그 공간을 가득 채우며 흐르는 에너지가 바로 룽남빠르규와라고 불리는 승행풍이야. 이 바람은 단순히 공기가 움직이는 게 아니라, 소리라는 신호를 뇌와 의식으로 번개처럼 전달해 주는 고속 정보 고속도로 같은 역할을 담당해. 새 집을 지을 때 거실과 방 구석구석까지 스피커 선을 촘촘하게 매설해서 언제든 아름다운 음악을 들을 수 있도록 세팅하는 과정과 아주 똑같아.</text:span><text:span/></text:p>
      <text:p text:style-name="P753"><text:span text:style-name="T1218">💧 촉촉하게 온몸을 적시는 물 원소의 생명력</text:span><text:span/></text:p>
      <text:p text:style-name="P754"><text:span text:style-name="T1219">이 청각의 문이 열리는 타이밍에 맞추어 우리 몸을 구성하는 근본 물질 중 하나인 물 원소도 함께 강하게 뿜어져 나오기 시작해. 물 원소는 태아의 신체 조직이 메마르지 않도록 촉촉한 수분을 공급하고, 미세한 에너지들이 막힘없이 흐를 수 있도록 돕는 역할을 하지. 메마른 사막에 시원한 단비가 내리며 강물이 흐르고 온 땅이 활기를 띠는 것처럼, 물 원소의 출현으로 태아의 몸은 한층 더 생기 있고 부드럽게 성숙해 가.</text:span><text:span/></text:p>
      <text:p text:style-name="P755"><text:span text:style-name="T1220">🎶 오디오와 배관 시스템의 완벽한 조화</text:span><text:span/></text:p>
      <text:p text:style-name="P756"><text:span text:style-name="T1221">결국 일곱째 달의 변화는 우리 몸이라는 최첨단 기기에 최고급 오디오 시스템과 깨끗한 배관 시설이 동시에 설치되는 거대한 리모델링 작업이야. 승행풍이라는 에너지 바람이 소리의 길을 터주고, 물 원소가 온몸에 신선한 생명수를 채워주면서 아기는 이제 세상을 향해 나아갈 감각적 기반을 단단하게 다지게 돼. 이 두 가지 힘이 내면에서 완벽하게 어우러지면서 보이지 않는 어둠 속에서도 생명은 소리와 수분을 통해 풍요롭게 자라나는 거지.</text:span><text:span/></text:p>
      <text:p text:style-name="P757"><text:span text:style-name="T1222">📝 핵심 요약</text:span><text:span/></text:p>
      <text:list text:style-name="WWNum42" text:continue-numbering="true">
        <text:list-item>
          <text:p text:style-name="P758"><text:span text:style-name="T1223">모태 안에서 일곱째 달이 되면 청각을 담당하는 귀의 문이 본격적으로 열림.</text:span><text:span/></text:p>
        </text:list-item>
        <text:list-item>
          <text:p text:style-name="P759"><text:span text:style-name="T1224">룽남빠르규와라고 불리는 승행풍이 귀로 흐르며 소리 신호를 전달할 길을 뚫어줌.</text:span><text:span/></text:p>
        </text:list-item>
        <text:list-item>
          <text:p text:style-name="P760"><text:span text:style-name="T1225">이와 동시에 몸의 수분을 조절하고 생기를 불어넣는 물 원소가 강하게 발생함.</text:span><text:span/></text:p>
        </text:list-item>
        <text:list-item>
          <text:p text:style-name="P761"><text:span text:style-name="T1226">소리와 수분의 결합을 통해 태아는 외부 세계를 인지할 감각적 기반을 완성해 나감.</text:span><text:span/></text:p>
        </text:list-item>
      </text:list>
      <text:p text:style-name="P762"><text:span><text:soft-page-break/></text:span><text:span/><text:span/></text:p>
      <text:p text:style-name="P763"><text:span text:style-name="T1227">[🟢 Online Mode | 26.06.05_15:59:25]</text:span><text:span/></text:p>
      <text:p text:style-name="P764"><text:span text:style-name="T1228">149. 여덟째 달의 숨결과 타오르는 불의 원소</text:span><text:span/></text:p>
      <text:p text:style-name="P765"><text:span text:style-name="T1229">🔑 핵심 키워드: 정행풍, 코의 숨결, 불 원소, 태아 성숙</text:span><text:span/></text:p>
      <text:p text:style-name="P766"><text:span text:style-name="T1230">👃 코로 흐르는 정행풍의 각성</text:span><text:span/></text:p>
      <text:p text:style-name="P767"><text:span text:style-name="T1231">엄마의 자궁 속에서 여덟째 달을 맞이하면 태아의 몸속에서는 정행풍이라는 아주 특별하고 미세한 바람이 강하게 깨어나기 시작해. 이 바람은 코라는 감각의 문을 통해 흐르며 앞으로 세상에 나와 스스로 숨을 쉴 수 있도록 준비하는 핵심 에너지야. 비유하자면 새로 지은 건물의 완공을 앞두고 환기 장치와 공기 순환 시스템이 제대로 작동하는지 미리 시험 가동을 해보는 것과 같아. 이 미세한 기류 덕분에 태아는 외부 세계와 연결될 호흡의 통로를 완벽하게 다듬게 되지.</text:span><text:span/></text:p>
      <text:p text:style-name="P768"><text:span text:style-name="T1232">🔥 생명을 데우는 불 원소의 결합</text:span><text:span/></text:p>
      <text:p text:style-name="P769"><text:span text:style-name="T1233">정행풍의 각성과 동시에 태아의 내면에서는 불의 원소가 본격적으로 발생해 몸 전체를 따뜻하게 감싸 안아. 이 불 원소는 단순히 온도를 높이는 것을 넘어 세포를 성숙시키고 생명력을 단단하게 굳히는 영적인 화로 역할을 해. 추운 겨울날 새로 지은 집에 보일러를 처음으로 강하게 틀어 온기를 가득 채우고 벽을 바짝 말리는 과정과 완전히 똑같아. 이 따뜻한 에너지가 세포 구석구석에 스며들면서 태아의 육체는 비로소 완벽한 생명체로서의 자립성을 갖추게 된단다.</text:span><text:span/></text:p>
      <text:p text:style-name="P770"><text:span text:style-name="T1234">⏳ 출생을 향한 정교한 타이밍</text:span><text:span/></text:p>
      <text:p text:style-name="P771"><text:span text:style-name="T1235">여덟째 달에 일어나는 이러한 변화들은 다음 달에 찾아올 위대한 탄생을 향한 우주의 정교한 스케줄 중 하나야. 코의 바람과 불의 에너지가 결합하면서 태아는 자궁 밖으로 나갈 마지막 카운트다운을 준비하지. 거대한 우주선이 발사되기 한 달 전, 기술자들이 연료 장치를 점검하고 엔진의 열을 예열하며 완벽한 발사 타이밍을 기다리는 모습과 매우 닮아 있어. 이 시기의 정교한 에너지 발달이 있어야만 세상의 거친 환경에 나와서도 건강하게 살아남을 수 있어.</text:span><text:span/></text:p>
      <text:p text:style-name="P772"><text:span text:style-name="T1236">🗺️ 미세 에너지로 완성되는 인간의 형상</text:span><text:span/></text:p>
      <text:p text:style-name="P773"><text:span text:style-name="T1237">결국 밀교에서 설명하는 임신 여덟째 달의 원소 발생은 우리의 육체가 눈에 보이지 않는 미세한 바람의 인도에 따라 완성된다는 사실을 보여줘. 뼈와 살이 자라는 물질적인 성장 뒤에는 이처럼 정행풍과 불 원소 같은 기류의 정밀한 배열이 숨어 있는 셈이지. 보이지 않는 설계 도면 위의 선들이 마침내 실제 벽돌과 기둥으로 입체화되어 멋진 집으로 완성되듯이, 미세한 기류들이 부지런히 움직여 마침내 존엄한 인간의 형상을 완벽하게 빚어내는 위대한 순간이야.</text:span><text:span/></text:p>
      <text:p text:style-name="P774"><text:span text:style-name="T1238">📝 핵심 요약</text:span><text:span/></text:p>
      <text:list text:style-name="WWNum43" text:continue-numbering="true">
        <text:list-item>
          <text:p text:style-name="P775"><text:span text:style-name="T1239">여덟째 달에는 코로 흐르는 미세한 에너지인 정행풍이 본격적으로 각성함</text:span><text:span/></text:p>
        </text:list-item>
        <text:list-item>
          <text:p text:style-name="P776"><text:span text:style-name="T1240">정행풍과 함께 몸을 성숙시키고 온기를 채우는 불의 원소가 동시에 발생함</text:span><text:span/></text:p>
        </text:list-item>
        <text:list-item>
          <text:p text:style-name="P777"><text:span text:style-name="T1241">이 변화는 다음 달의 출산을 앞두고 호흡과 생명력을 예열하는 필수 과정임</text:span><text:span/></text:p>
        </text:list-item>
        <text:list-item>
          <text:p text:style-name="P778"><text:span text:style-name="T1242">미세한 기류와 원소의 결합을 통해 태아는 세상 밖으로 나올 완벽한 자립성을 갖춤</text:span><text:span/></text:p>
        </text:list-item>
      </text:list>
      <text:p text:style-name="P779"><text:span><text:soft-page-break/></text:span><text:span/><text:span/></text:p>
      <text:p text:style-name="P780"><text:span text:style-name="T1243">150. 태아 발달의 마무리와 첫 호흡의 준비</text:span><text:span/></text:p>
      <text:p text:style-name="P781"><text:span text:style-name="T1244">🔑 핵심 키워드: 극행풍, 결행풍, 허공 원소, 내강, 십풍, 첫 호흡</text:span><text:span/></text:p>
      <text:p text:style-name="P782"><text:span text:style-name="T1245">👅 아홉째 달의 발달과 맛을 느끼는 바람</text:span><text:span/></text:p>
      <text:p text:style-name="P783"><text:span text:style-name="T1246">아홉째 달이 되면 태아의 몸속에서는 출산을 앞두고 아주 정교한 변화가 일어나. 혀의 감각을 담당하는 통로로 흐르는 극행풍이라는 미세한 바람과 함께, 움직임을 관장하는 바람 원소가 본격적으로 발달하지. 이것은 마치 새로 지은 집의 주방에 가스 배관을 연결하고 화력을 테스트하는 과정과 같아. 이 미세한 에너지가 자리를 잡으면서 태아는 세상에 나가 다양한 맛을 인지하고 설포라는 감각 기관을 부드럽게 움직일 수 있는 내부적인 기반을 마련하게 되는 거야.</text:span><text:span/></text:p>
      <text:p text:style-name="P784"><text:span text:style-name="T1247">🌌 열째 달의 완성과 몸속 공간의 창조</text:span><text:span/></text:p>
      <text:p text:style-name="P785"><text:span text:style-name="T1248">마지막 열째 달에 접어들면 온몸의 세포와 혈규로 흐르는 결행풍이 일어나고, 이와 함께 만물을 포용하는 허공 원소가 비로소 생겨나. 이 시기는 건축으로 치면 건물의 외벽을 튼튼하게 다 세우고 난 뒤 방과 거실, 복도 같은 내부 공간을 훤히 뚫어주는 최종 마감 공사와 아주 비슷해. 이 허공 원소가 활성화되면서 우리 몸 안에는 위나 장, 기관지처럼 음식을 소화하고 숨을 쉴 수 있는 소중한 빈 공간들이 비로소 완벽한 형태를 갖추게 되지.</text:span><text:span/></text:p>
      <text:p text:style-name="P786"><text:span text:style-name="T1249">🌬️ 모태 안에서 완성되는 열 가지 생명의 바람</text:span><text:span/></text:p>
      <text:p text:style-name="P787"><text:span text:style-name="T1250">엄마 뱃속에서 달수가 차오르는 동안, 태아의 내면에서는 생명을 유지하고 다섯 가지 감각을 도와주는 열 가지 종류의 바람인 십풍이 모두 제자리를 잡게 돼. 이는 마치 우주선이 우주로 발사되기 직전, 조종석의 모든 제어 장치 전원을 켜고 시스템 계기판의 불빛들을 하나씩 확인하며 대기하는 상태와 같지. 눈에 보이지 않는 이 미세한 에너지 순환 시스템이 온전하게 구축되어야만 비로소 거친 세상으로 나갈 수 있는 생명력이 완성되는 법이야.</text:span><text:span/></text:p>
      <text:p text:style-name="P788"><text:span text:style-name="T1251">👶 세상과 만나는 첫 번째 관문, 코 호흡</text:span><text:span/></text:p>
      <text:p text:style-name="P789"><text:span text:style-name="T1252">가장 신기한 점은 이 열 가지 바람이 몸속에서 완벽하게 형성되었음에도 불구하고, 엄마 뱃속에 있는 동안에는 코로 직접 공기를 들이쉬고 내쉬는 거친 호흡을 하지 않는다는 사실이야. 깊은 바닷속을 잠항하는 잠수함이 외부 해치를 닫은 채 내부 장치로만 숨을 쉬는 것처럼 말이지. 그러다 모태를 벗어나 세상 밖으로 나오는 그 짧은 순간, 비로소 닫혀 있던 숨길이 열리며 코로 대기의 공기를 흡입하는 위대한 첫 호흡을 시작하게 된단다.</text:span><text:span/></text:p>
      <text:p text:style-name="P790"><text:span text:style-name="T1253">📝 핵심 요약</text:span><text:span/></text:p>
      <text:list text:style-name="WWNum44" text:continue-numbering="true">
        <text:list-item>
          <text:p text:style-name="P791"><text:span text:style-name="T1254">아홉째 달에는 혀로 흐르는 극행풍과 바람 원소가 발생하여 신체 감각의 기반을 다진다.</text:span><text:span/></text:p>
        </text:list-item>
        <text:list-item>
          <text:p text:style-name="P792"><text:span text:style-name="T1255">열째 달에는 몸 전체로 흐르는 결행풍과 허공 원소가 발생하며 몸속의 빈 공간들이 형성된다.</text:span><text:span/></text:p>
        </text:list-item>
        <text:list-item>
          <text:p text:style-name="P793"><text:span text:style-name="T1256">모태 안에서 인체를 지탱하는 열 가지 생명의 바람인 십풍이 완벽하게 짜인다.</text:span><text:span/></text:p>
        </text:list-item>
        <text:list-item>
          <text:p text:style-name="P794"><text:span text:style-name="T1257">뱃속에서는 코로 숨을 쉬지 않으며, 출산하는 즉시 코를 통한 첫 번째 호흡이 시작된다.</text:span><text:span/></text:p>
        </text:list-item>
      </text:list>
      <text:p text:style-name="P795"><text:span><text:soft-page-break/></text:span><text:span/><text:span/></text:p>
      <text:p text:style-name="P796"><text:span text:style-name="T1258">[🟢 Online Mode | 26.06.05_16:05:15]</text:span><text:span/></text:p>
      <text:p text:style-name="P797"><text:span text:style-name="T1259">151. 심장 깊은 곳에 숨겨진 생명의 핵심 핵, 불괴명점</text:span><text:span/></text:p>
      <text:p text:style-name="P798"><text:span text:style-name="T1260">🔑 핵심 키워드: 하얀 보리심, 붉은 보리심, 미세한 풍심, 아와두띠, 불괴명점</text:span><text:span/></text:p>
      <text:p text:style-name="P799"><text:span text:style-name="T1261">🧪 세 가지 근본 에너지의 정밀한 융합</text:span><text:span/></text:p>
      <text:p text:style-name="P800"><text:span text:style-name="T1262">우리 몸의 가장 깊은 곳에서는 부모에게 물려받은 하얀 보리심과 붉은 보리심의 맑은 정수가 한데 모이게 돼. 여기에 우리 생명과 의식의 근본인 극도로 미세한 풍심이 결합하면서 아주 특별한 하나의 덩어리를 이루지. 이것은 마치 최첨단 스마트폰을 만들 때 가장 정밀한 핵심 부품과 메인 운영체제의 프로그램이 완벽하게 결합하여 작동을 시작하는 것과 아주 비슷해.</text:span><text:span/></text:p>
      <text:p text:style-name="P801"><text:span text:style-name="T1263">⚪ 흰 겨자씨 크기에 응축된 우주의 빛 방울</text:span><text:span/></text:p>
      <text:p text:style-name="P802"><text:span text:style-name="T1264">이렇게 결합한 에너지는 거대하게 퍼지는 게 아니라 아주 작은 흰 겨자씨만 한 크기로 단단하게 응축되어 빛나는 방울 형태를 취하게 돼. 눈에 보이지 않을 만큼 아주 작지만 그 안에는 한 인간의 전 생애를 이끌어갈 모든 정보와 생명력이 밀도 높게 압축되어 있지. 밤하늘을 수놓는 거대한 은하계의 에너지를 단 하나의 작은 보석 속에 고스란히 담아낸 듯한 놀라운 압축의 미학이야.</text:span><text:span/></text:p>
      <text:p text:style-name="P803"><text:span text:style-name="T1265">🫀 심장 중심 통로 속의 절대 비밀 공간</text:span><text:span/></text:p>
      <text:p text:style-name="P804"><text:span text:style-name="T1266">이 빛나는 방울이 자리 잡는 위치는 우리 몸의 중심축인 심장 속 아와두띠의 가장 깊숙한 내부야. 아와두띠라는 거대한 에너지 고속도로 한가운데에 오직 이 방울만을 위해 마련된 극소의 빈 공간이 존재하거든. 대형 은행의 가장 깊은 지하에 삼중 사중의 철갑으로 둘러싸인 최고 보안 등급의 비밀 금고 안에 소중한 보물을 안전하게 보관해 둔 형상이라고 이해하면 돼.</text:span><text:span/></text:p>
      <text:p text:style-name="P805"><text:span text:style-name="T1267">💎 죽음의 순간까지 결코 파괴되지 않는 의지처</text:span><text:span/></text:p>
      <text:p text:style-name="P806"><text:span text:style-name="T1268">이 작고 신비로운 방울을 가리켜 우리는 생명의 영원한 의지처인 불괴명점이라고 불러. 불괴라는 말 그대로 우리가 살아있는 동안에는 그 어떤 물리적인 타격이나 충격, 심지어 거대한 질병으로도 절대로 부서지거나 파괴되지 않는 절대적인 내구성을 지니고 있지. 우리 영혼의 메인 컴퓨터 하드디스크와 같아서, 육체가 완전히 수명을 다해 막을 내리는 마지막 순간까지 우리 의식을 안전하게 지켜주는 든든한 버팀목이야.</text:span><text:span/></text:p>
      <text:p text:style-name="P807"><text:span text:style-name="T1269">📝 핵심 요약</text:span><text:span/></text:p>
      <text:list text:style-name="WWNum45" text:continue-numbering="true">
        <text:list-item>
          <text:p text:style-name="P808"><text:span text:style-name="T1270">하얀 보리심과 붉은 보리심의 정수가 미세한 풍심과 결합하여 생명의 빛 방울을 형성함.</text:span><text:span/></text:p>
        </text:list-item>
        <text:list-item>
          <text:p text:style-name="P809"><text:span text:style-name="T1271">이 방울은 흰 겨자씨 크기로 아주 작지만 온갖 생명 에너지와 의식이 고밀도로 응축되어 있음.</text:span><text:span/></text:p>
        </text:list-item>
        <text:list-item>
          <text:p text:style-name="P810"><text:span text:style-name="T1272">심장 중앙을 관통하는 아와두띠 내부의 극소 공간에 완벽하게 보호된 채 존재함.</text:span><text:span/></text:p>
        </text:list-item>
        <text:list-item>
          <text:p text:style-name="P811"><text:span text:style-name="T1273">살아있는 동안 결코 파괴되지 않는 불괴명점으로서 영혼과 의식의 가장 근본적인 중심축 역할을 함.</text:span><text:span/></text:p>
        </text:list-item>
      </text:list>
      <text:p text:style-name="P812"><text:span><text:soft-page-break/></text:span><text:span/><text:span/></text:p>
      <text:p text:style-name="P813"><text:span text:style-name="T1274">[🟢 Online Mode | 26.06.05_16:05:20]</text:span><text:span/></text:p>
      <text:p text:style-name="P814"><text:span text:style-name="T1275">152. 정수리로 올라간 하얀 보리심과 생명의 씨앗 함</text:span><text:span/></text:p>
      <text:p text:style-name="P815"><text:span text:style-name="T1276">🔑 핵심 키워드: 하얀 보리심, 정수리 짜끄라, 함, 생장, 에너지 분배</text:span><text:span/></text:p>
      <text:p text:style-name="P816"><text:span text:style-name="T1277">🏰 정수리 꼭대기에 세워진 에너지 본부</text:span><text:span/></text:p>
      <text:p text:style-name="P817"><text:span text:style-name="T1278">자궁 속에서 생명의 기본 틀이 잡힌 후, 하얀 보리심의 소중한 일부분이 우리의 몸 가장 높은 곳인 정수리 짜끄라를 향해 거슬러 올라가 자리를 잡게 돼. 이것은 마치 한 나라의 중심이 되는 수도에 거대한 국가 중앙 서버를 구축하거나, 도시 전체에 맑은 물을 공급할 가장 높은 양수장을 건설하는 것과 같지. 우리 몸 전체의 음양 균형과 생명력을 컨트롤할 최고의 에너지 본부가 머리 꼭대기에 마침내 문을 여는 순간이란다.</text:span><text:span/></text:p>
      <text:p text:style-name="P818"><text:span text:style-name="T1279">🔤 생명을 깨우는 마법의 비밀번호 함</text:span><text:span/></text:p>
      <text:p text:style-name="P819"><text:span text:style-name="T1280">정수리에 안착한 이 하얀 보리심의 핵심 에너지를 고대 인도와 티베트 영성에서는 함이라는 신성한 글자로 불러. 이는 단순한 글자가 아니라, 우리 몸의 잠겨 있는 신성한 에너지를 깨우는 마법의 비밀번호이자 메인 전원 스위치와 같은 존재야. 이 함이라는 씨앗 글자가 정수리에서 고요히 빛나기 시작하면서, 우리 육체는 비로소 고차원적인 정신 활동과 생명 활동을 시작할 준비를 완벽하게 마치게 되지.</text:span><text:span/></text:p>
      <text:p text:style-name="P820"><text:span text:style-name="T1281">📡 온몸으로 퍼져나가는 생명력의 와이파이</text:span><text:span/></text:p>
      <text:p text:style-name="P821"><text:span text:style-name="T1282">정수리에 자리 잡은 함은 혼자만 빛나는 게 아니라, 몸의 구석구석 숨겨져 있는 다른 모든 하얀 보리심들을 향해 강력한 생명 에너지를 보내기 시작해. 이것은 마치 고성능 와이파이 공유기가 집안 구석구석까지 전파를 보내 스마트폰들을 연결하는 것과 같고, 영양분이 가득한 신선한 피가 모세혈관을 타고 손끝 발끝까지 흐르는 것과 비슷하지. 직접적으로 강력한 에너지를 주입하기도 하고, 간접적으로 주변 세포들을 자극하며 온몸의 생명력을 풍성하게 키워내.</text:span><text:span/></text:p>
      <text:p text:style-name="P822"><text:span text:style-name="T1283">🌳 한 방울의 샘물에서 자라나는 울창한 숲</text:span><text:span/></text:p>
      <text:p text:style-name="P823"><text:span text:style-name="T1284">이렇게 함에서 시작된 에너지의 생장 작용 덕분에, 우리 몸 전체의 미세한 에너지 시스템은 마침내 풍요롭고 건강하게 자라나게 돼. 하나의 깊은 산속 샘물에서 맑은 물이 퐁퐁 솟아나 결국 거대한 강을 이루고 주변의 온 숲을 푸르게 키워내는 것처럼 말이야. 정수리의 작은 씨앗 하나가 온몸의 에너지를 직접 가꾸고 키워내면서, 우리는 신체와 정신이 완벽한 조화를 이루는 건강한 인간의 모습을 갖추어 가게 된단다.</text:span><text:span/></text:p>
      <text:p text:style-name="P824"><text:span text:style-name="T1285">📝 핵심 요약</text:span><text:span/></text:p>
      <text:list text:style-name="WWNum46" text:continue-numbering="true">
        <text:list-item>
          <text:p text:style-name="P825"><text:span text:style-name="T1286">하얀 보리심의 일부가 몸의 가장 높은 정수리 짜끄라로 올라가 자리를 잡는다.</text:span><text:span/></text:p>
        </text:list-item>
        <text:list-item>
          <text:p text:style-name="P826"><text:span text:style-name="T1287">정수리에 안착한 이 핵심 에너지를 생명의 전원 스위치인 함이라 부른다.</text:span><text:span/></text:p>
        </text:list-item>
        <text:list-item>
          <text:p text:style-name="P827"><text:span text:style-name="T1288">함은 몸 전체에 퍼져 있는 다른 하얀 보리심들을 직접 또는 간접적으로 생장시킨다.</text:span><text:span/></text:p>
        </text:list-item>
        <text:list-item>
          <text:p text:style-name="P828"><text:span text:style-name="T1289">이 중심 에너지의 분배를 통해 온몸의 미세한 에너지 시스템이 조화롭게 발달한다.</text:span><text:span/></text:p>
        </text:list-item>
      </text:list>
      <text:p text:style-name="P829"><text:span><text:soft-page-break/></text:span><text:span/><text:span/></text:p>
      <text:p text:style-name="P830"><text:span text:style-name="T1290">[🔴 Offline Mode | 26.06.05_16:05:25]</text:span><text:span/></text:p>
      <text:p text:style-name="P831"><text:span text:style-name="T1291">153. 배꼽에서 피어나는 생명의 불꽃, 뚬모</text:span><text:span/></text:p>
      <text:p text:style-name="P832"><text:span text:style-name="T1292">🔑 핵심 키워드: 심장 보리심, 배꼽 짜끄라, 뚬모, 붉은 보리심, 에너지 생장</text:span><text:span/></text:p>
      <text:p text:style-name="P833"><text:span text:style-name="T1293">❤️ 심장에서 배꼽으로 내려가는 신비로운 여정</text:span><text:span/></text:p>
      <text:p text:style-name="P834"><text:span text:style-name="T1294">우리 몸의 가장 중심인 심장 속에는 생명의 깊은 정수인 붉은 보리심이 소중하게 간직되어 있어. 이 신비로운 에너지의 일부가 아래로 스르르 흘러내려 배꼽 짜끄라, 즉 배꼽의 에너지 센터 안으로 깊숙이 들어가 자리를 잠게 된단다. 이것은 마치 온 집안을 따뜻하게 데우기 위해 중앙 발전소에서 흘러나온 뜨거운 에너지가 방바닥의 핵심 보일러 배관 속으로 이동하는 과정과 아주 비슷해. 심장에만 머물던 고귀한 생명의 씨앗이 몸의 중심축을 따라 아래로 이동하며 새로운 </text:span><text:span text:style-name="T1295">생명 활동을 준비하는 첫 단계이지.</text:span><text:span/></text:p>
      <text:p text:style-name="P835"><text:span text:style-name="T1296">🔥 배꼽 안에서 깨어나는 불꽃, 뚬모</text:span><text:span/></text:p>
      <text:p text:style-name="P836"><text:span text:style-name="T1297">이렇게 배꼽의 에너지 센터로 들어간 붉은 보리심의 에너지는 그곳에 머물며 아주 강력한 생명의 불꽃을 피워내는데, 이를 바로 뚬모라고 불러. 우리말로 쉽게 표현하면 배꼽 불이라고 할 수 있지. 평소에는 작고 고요한 불씨처럼 숨겨져 있다가, 심장에서 내려온 에너지를 만나면서 활활 타오르는 강력한 용광로처럼 변하는 거야. 돋보기로 햇빛을 한곳에 모으면 순식간에 강력한 불꽃이 피어오르는 것처럼, 배꼽이라는 집중된 공간 속에서 생명의 원초적인 열기가 뜨겁게 깨어나</text:span><text:span text:style-name="T1298">는 신비로운 현상이야.</text:span><text:span/></text:p>
      <text:p text:style-name="P837"><text:span text:style-name="T1299">🪵 전신의 붉은 에너지를 키우는 불씨의 역할</text:span><text:span/></text:p>
      <text:p text:style-name="P838"><text:span text:style-name="T1300">배꼽에서 활활 타오르기 시작한 뚬모의 불꽃은 단순히 그 자리에만 머무는 것이 아니라, 우리 몸 구석구석에 숨겨져 있는 모든 붉은 보리심들을 자극하고 성장시키는 역할을 해. 직접 불길을 전달하기도 하고, 은은한 열기를 사방으로 뿜어내며 몸속의 다른 에너지들을 간접적으로 일깨우기도 하지. 이는 마치 커다란 화로에 잘 달구어진 중심 숯불 하나가 주변의 차가운 장작더미에 온기를 나누어주어, 결국 방 안의 모든 장작들이 스스로 따뜻한 열기를 내뿜도록 만드는 이치와</text:span><text:span text:style-name="T1301"> 똑같단다.</text:span><text:span/></text:p>
      <text:p text:style-name="P839"><text:span text:style-name="T1302">🌊 생명력을 충전하는 온전한 순환의 신비</text:span><text:span/></text:p>
      <text:p text:style-name="P840"><text:span text:style-name="T1303">이 뚬모의 열기를 통해 전신의 붉은 보리심들이 풍성하게 생장하면서, 우리의 육체와 정신은 그 어느 때보다 활기차고 건강한 생명력으로 가득 차게 돼. 온몸의 미세한 통로를 따라 따스한 에너지가 막힘없이 순환하며 세포 하나하나를 깨우고 활력을 불어넣어 주거든. 메마르고 차가웠던 겨울 대지에 따스한 봄기운이 스며든 것처럼 온갖 꽃과 나무들이 일제히 싹을 틔우고 무성하게 자라나듯, 배꼽의 불꽃이 만들어낸 온기가 우리 존재 전체를 가장 건강하고 온전한 상태로 풍요</text:span><text:span text:style-name="T1304">롭게 가꾸어 주는 거란다.</text:span><text:span/></text:p>
      <text:p text:style-name="P841"><text:span text:style-name="T1305">📝 핵심 요약</text:span><text:span/></text:p>
      <text:list text:style-name="WWNum47" text:continue-numbering="true">
        <text:list-item>
          <text:p text:style-name="P842"><text:span text:style-name="T1306">심장 속에 머물던 고귀한 붉은 보리심의 일부분이 배꼽의 에너지 센터인 짜끄라로 이동함.</text:span><text:span/></text:p>
        </text:list-item>
        <text:list-item>
          <text:p text:style-name="P843"><text:span text:style-name="T1307">배꼽으로 내려간 에너지는 그곳에 머물며 뚬모라고 부르는 강력한 배꼽 불을 피워냄.</text:span><text:span/></text:p>
        </text:list-item>
        <text:list-item>
          <text:p text:style-name="P844"><text:span text:style-name="T1308">활성화된 뚬모는 몸 안의 다른 모든 붉은 보리심을 직접 또는 간접적으로 생장시킴.</text:span><text:span/></text:p>
        </text:list-item>
        <text:list-item>
          <text:p text:style-name="P845"><text:span text:style-name="T1309">붉은 에너지의 풍성한 성장을 통해 온몸에 건강하고 활기찬 생명력의 순환이 완성됨.</text:span><text:span/></text:p>
        </text:list-item>
      </text:list>
      <text:p text:style-name="P846"><text:span><text:soft-page-break/></text:span><text:span/><text:span/></text:p>
      <text:p text:style-name="P847"><text:span text:style-name="T1310">[🟢 Online Mode | 26.06.05_16:05:31]</text:span><text:span/></text:p>
      <text:p text:style-name="P848"><text:span text:style-name="T1311">154. 세 가지 짜끄라와 보리심의 영적 기지</text:span><text:span/></text:p>
      <text:p text:style-name="P849"><text:span text:style-name="T1312">🔑 핵심 키워드: 짜끄라, 명점, 정수리, 배꼽, 심장</text:span><text:span/></text:p>
      <text:p text:style-name="P850"><text:span text:style-name="T1313">🎡 짜끄라와 명점의 아늑한 에너지 기지</text:span><text:span/></text:p>
      <text:p text:style-name="P851"><text:span text:style-name="T1314">우리 몸의 에너지가 모이고 흩어지는 핵심 정거장인 짜끄라는 미세한 생명 에너지가 머무는 아늑한 기지와 같아. 비록 몸 곳곳의 모든 짜끄라에 원초적인 생명의 씨앗인 명점 즉 보리심의 일부가 다 존재하긴 하지만, 각각의 정거장마다 특별히 전문적으로 생산하고 키워내는 에너지의 종류가 완전히 다르단다. 마치 대기업의 지사들이 전국에 퍼져 있어도 본사, 연구소, 공장이 각각 맡은 주력 업무가 다른 것과 같은 원리야.</text:span><text:span/></text:p>
      <text:p text:style-name="P852"><text:span text:style-name="T1315">⚪ 정수리와 배꼽의 음양 조화</text:span><text:span/></text:p>
      <text:p text:style-name="P853"><text:span text:style-name="T1316">정수리에 위치한 짜끄라는 순수하고 차가운 에너지를 상징하는 하얀 보리심이 자라나는 최고의 본거지야. 반대로 배꼽에 위치한 짜끄라는 뜨겁고 역동적인 생명력을 상징하는 붉은 보리심을 집중적으로 키워내는 핵심 기지이지. 이것은 마치 지구의 북극에는 얼음과 눈의 하얀 세계가 펼쳐지고, 적도 부근에는 이글거리는 태양의 붉은 열기가 가득 차 있는 자연의 거대한 조화와 완벽하게 닮아 있어. 생소한 개념이라 처음에는 와닿지 않을 수 있지만, 우리 몸을 하나의 작은 지구</text:span><text:span text:style-name="T1317">로 바라보면 이해하기 훨씬 수월해질 거야.</text:span><text:span/></text:p>
      <text:p text:style-name="P854"><text:span text:style-name="T1318">❤️ 균형과 안정을 자아내는 심장의 신성함</text:span><text:span/></text:p>
      <text:p text:style-name="P855"><text:span text:style-name="T1319">가장 중심에 있는 심장의 짜끄라는 정수리의 하얀 성분과 배꼽의 붉은 성분이 정확하게 절반씩 만나 완벽한 균형을 이루는 아주 신성한 장소란다. 차가운 얼음물 crystalline 과 뜨거운 끓는 물이 만나 가장 기분 좋은 온도의 따뜻한 물이 되듯, 대립하는 두 에너지가 심장에서 만나 완벽한 조화를 이루는 거야. 이 조화야말로 우리 의식을 가장 안정되고 깊은 삼매의 상태로 이끄는 강력한 힘이 되지.</text:span><text:span/></text:p>
      <text:p text:style-name="P856"><text:span text:style-name="T1320">📊 신체 중심축의 에너지 분포 구조</text:span><text:span/></text:p>
      <text:p text:style-name="P857"><text:span text:style-name="T1321">우리 몸의 중심축을 이루는 세 가지 짜끄라의 특성과 에너지의 역할을 한눈에 보기 쉽게 구조화된 표로 정리해 줄게.</text:span><text:span/></text:p>
      <table:table table:style-name="ta5">
        <table:table-columns>
          <table:table-column table:style-name="co13"/>
          <table:table-column table:style-name="co14"/>
          <table:table-column table:style-name="co15"/>
        </table:table-columns>
        <table:table-row table:style-name="ro14" table:default-cell-style-name="ce44">
          <table:table-cell table:style-name="ce45">
            <text:p text:style-name="P858"><text:span text:style-name="T1322">짜끄라 위치</text:span><text:span/></text:p>
          </table:table-cell>
          <table:table-cell table:style-name="ce46">
            <text:p text:style-name="P859"><text:span text:style-name="T1323">주력 에너지 성분</text:span><text:span/></text:p>
          </table:table-cell>
          <table:table-cell table:style-name="ce47">
            <text:p text:style-name="P860"><text:span text:style-name="T1324">에너지의 성질과 역할</text:span><text:span/></text:p>
          </table:table-cell>
        </table:table-row>
        <table:table-row table:style-name="ro15" table:default-cell-style-name="ce44">
          <table:table-cell table:style-name="ce48">
            <text:p text:style-name="P861"><text:span text:style-name="T1325">정수리</text:span><text:span/></text:p>
          </table:table-cell>
          <table:table-cell table:style-name="ce49">
            <text:p text:style-name="P862"><text:span text:style-name="T1326">하얀 보리심</text:span><text:span/></text:p>
          </table:table-cell>
          <table:table-cell table:style-name="ce50">
            <text:p text:style-name="P863"><text:span text:style-name="T1327">차분하고 맑은 정신적 청정함의 원천</text:span><text:span/></text:p>
          </table:table-cell>
        </table:table-row>
        <table:table-row table:style-name="ro16" table:default-cell-style-name="ce44">
          <table:table-cell table:style-name="ce51">
            <text:p text:style-name="P864"><text:span text:style-name="T1328">배꼽</text:span><text:span/></text:p>
          </table:table-cell>
          <table:table-cell table:style-name="ce52">
            <text:p text:style-name="P865"><text:span text:style-name="T1329">붉은 보리심</text:span><text:span/></text:p>
          </table:table-cell>
          <table:table-cell table:style-name="ce53">
            <text:p text:style-name="P866"><text:span text:style-name="T1330">뜨겁고 역동적인 생명력과 활력의 기지</text:span><text:span/></text:p>
          </table:table-cell>
        </table:table-row>
        <table:table-row table:style-name="ro17" table:default-cell-style-name="ce44">
          <table:table-cell table:style-name="ce54">
            <text:p text:style-name="P867"><text:span text:style-name="T1331">심장</text:span><text:span/></text:p>
          </table:table-cell>
          <table:table-cell table:style-name="ce55">
            <text:p text:style-name="P868"><text:span text:style-name="T1332">하얀 보리심과 붉은 보리심</text:span><text:span/></text:p>
          </table:table-cell>
          <table:table-cell table:style-name="ce56">
            <text:p text:style-name="P869"><text:span text:style-name="T1333">음양의 완벽한 결합과 깨달음의 중심지</text:span><text:span/></text:p>
          </table:table-cell>
        </table:table-row>
      </table:table>
      <text:p text:style-name="P870"><text:span text:style-name="T1334">📝 핵심 요약</text:span><text:span/></text:p>
      <text:list text:style-name="WWNum48" text:continue-numbering="true">
        <text:list-item>
          <text:p text:style-name="P871"><text:span text:style-name="T1335">몸의 중심 짜끄라들은 미세한 보리심 에너지가 머물고 생장하는 영적인 기지 역할을 해.</text:span><text:span/></text:p>
        </text:list-item>
        <text:list-item>
          <text:p text:style-name="P872"><text:span text:style-name="T1336">정수리 짜끄라는 차분하고 청정한 하얀 보리심을 키워내는 본거지야.</text:span><text:span/></text:p>
        </text:list-item>
        <text:list-item>
          <text:p text:style-name="P873"><text:span text:style-name="T1337">배꼽 짜끄라는 뜨거운 생명력과 활력을 뿜어내는 붉은 보리심의 중심지야.</text:span><text:span/></text:p>
        </text:list-item>
        <text:list-item>
          <text:p text:style-name="P874"><text:span text:style-name="T1338">심장 짜끄라는 두 가지 에너지가 완벽하게 만나 균형을 이루며 깊은 깨달음을 자아내는 장소야.</text:span><text:span/></text:p>
        </text:list-item>
      </text:list>
      <text:p text:style-name="P875"><text:span><text:soft-page-break/></text:span><text:span/><text:span/></text:p>
      <text:p text:style-name="P876"><text:span text:style-name="T1339">[🟢 Online Mode | 26.06.05_16:05:37]</text:span><text:span/></text:p>
      <text:p text:style-name="P877"><text:span text:style-name="T1340">155. 백정과 적정의 역동적 생성과 무한한 공급</text:span><text:span/></text:p>
      <text:p text:style-name="P878"><text:span text:style-name="T1341">🔑 핵심 키워드: 하얀 보리심, 붉은 보리심, 실시간 생성, 무한한 공급, 에너지 조절</text:span><text:span/></text:p>
      <text:p text:style-name="P879"><text:span text:style-name="T1342">🥛 고정된 저장소가 아닌 실시간 생산 기지</text:span><text:span/></text:p>
      <text:p text:style-name="P880"><text:span text:style-name="T1343">우리 몸과 마음을 지탱하는 핵심 에너지인 하얀 보리심과 붉은 보리심은 미리 만들어져서 어딘가에 고여 있는 물질이 아니야. 비유하자면 커다란 물통에 물을 가득 채워놓고 필요할 때마다 조금씩 아껴 쓰는 방식이 전혀 아니라는 뜻이지. 이 에너지들은 고정된 저장고에 갇혀 있는 게 아니라, 우리 의식의 필요에 반응하여 그 즉시 작동하는 역동적인 생명력의 현상이야.</text:span><text:span/></text:p>
      <text:p text:style-name="P881"><text:span text:style-name="T1344">🔄 필요에 따라 솟아나는 온디맨드 에너지</text:span><text:span/></text:p>
      <text:p text:style-name="P882"><text:span text:style-name="T1345">이 원초적인 에너지들은 오직 그것을 필요로 하는 특정한 시기가 찾아왔을 때 비로소 새롭게 생성되고 뿜어져 나와. 마치 평소에는 아무것도 없는 벽처럼 보이다가도, 손을 가까이 대면 센서가 작동해 맑은 물이 쏟아지는 최첨단 자동 수도꼭지와 같은 원리지. 영적인 수행이나 생명의 거대한 전환기처럼 에너지가 반드시 필요한 순간이 되면, 마음에 내장된 프로그램이 즉각 가동되면서 순수한 에너지를 실시간으로 빚어내게 돼.</text:span><text:span/></text:p>
      <text:p text:style-name="P883"><text:span text:style-name="T1346">🪹 항아리의 한계를 뛰어넘는 무한성</text:span><text:span/></text:p>
      <text:p text:style-name="P884"><text:span text:style-name="T1347">본문에서 항아리에 채워진 물과 같지 않다고 강조한 이유는 유한성과 무한성의 결정적인 차이 때문이야. 항아리에 담긴 물은 아무리 양이 많아도 계속 쓰다 보면 결국 바닥을 드러내며 완전히 고갈될 수밖에 없잖아. 하지만 우리 내면의 백정과 적정은 물질적인 경계를 넘어선 의식의 영역에 뿌리를 두고 있기 때문에, 소모되어 사라지는 유한한 자원이 아니라 필요할 때마다 무한히 샘솟는 끝없는 원천과 같아.</text:span><text:span/></text:p>
      <text:p text:style-name="P885"><text:span text:style-name="T1348">🔋 생명 시스템의 자율적 조절 메커니즘</text:span><text:span/></text:p>
      <text:p text:style-name="P886"><text:span text:style-name="T1349">이처럼 에너지가 실시간으로 맞춤 생산되는 구조 덕분에 우리 생명 시스템은 외부의 고갈 위험으로부터 스스로를 안전하게 보호할 수 있어. 비유하자면 배터리 용량이 정해진 기기를 아슬아슬하게 충전하며 쓰는 게 아니라, 태양광 패널을 달고 있어서 햇빛이 필요할 때마다 실시간으로 무한한 전력을 자가 발전하여 구동하는 스마트 가전제품과 비슷하지. 의식의 흐름과 완벽하게 발을 맞추며 가장 최적의 타이밍에 에너지를 공급하는 자율적인 조절 메커니즘인 셈이야.</text:span><text:span/></text:p>
      <text:p text:style-name="P887"><text:span text:style-name="T1350">📝 핵심 요약</text:span><text:span/></text:p>
      <text:list text:style-name="WWNum49" text:continue-numbering="true">
        <text:list-item>
          <text:p text:style-name="P888"><text:span text:style-name="T1351">하얀 보리심과 붉은 보리심은 고정된 용기에 담긴 물처럼 유한하게 고여 있는 것이 아님.</text:span><text:span/></text:p>
        </text:list-item>
        <text:list-item>
          <text:p text:style-name="P889"><text:span text:style-name="T1352">에너지가 필요한 특정한 시기와 조건이 충족되면 실시간으로 새롭게 생성되어 공급됨.</text:span><text:span/></text:p>
        </text:list-item>
        <text:list-item>
          <text:p text:style-name="P890"><text:span text:style-name="T1353">물질적 한계를 벗어나 의식의 깊은 원천에서 무한하게 샘솟는 비고갈성 자원임.</text:span><text:span/></text:p>
        </text:list-item>
        <text:list-item>
          <text:p text:style-name="P891"><text:span text:style-name="T1354">생명과 의식의 전환기에 맞추어 가장 필요한 순간에 작동하는 자율적 조절 시스템임.</text:span><text:span/></text:p>
        </text:list-item>
      </text:list>
      <text:p text:style-name="P892"><text:span><text:soft-page-break/></text:span><text:span/><text:span/></text:p>
      <text:p text:style-name="P893"><text:span text:style-name="T1355">[🟢 Online Mode | 26.06.05_16:05:42]</text:span><text:span/></text:p>
      <text:p text:style-name="P894"><text:span text:style-name="T1356">156. 자궁으로의 탁태와 기본 화신의 완성</text:span><text:span/></text:p>
      <text:p text:style-name="P895"><text:span text:style-name="T1357">🔑 핵심 키워드: 자궁 탁태, 거친 육신, 기본 화신, 생명의 무대, 물질 세계</text:span><text:span/></text:p>
      <text:p text:style-name="P896"><text:span text:style-name="T1358">🚪 자궁으로의 진입과 새로운 무대의 시작</text:span><text:span/></text:p>
      <text:p text:style-name="P897"><text:span text:style-name="T1359">바르도라는 중간 대기실을 떠나 드디어 어머니의 자궁이라는 새로운 보금자리에 자리를 잡는 순간을 불교에서는 탁태라고 불러. 이것은 마치 오랜 시간 우주를 떠돌던 우주선이 드디어 안전하게 착륙할 행성을 찾아 기지에 무사히 안착하는 것과 같지. 의식이라는 보이지 않는 에너지가 마침내 눈에 보이는 물질 세계와 단단히 결합하여, 새로운 삶이라는 거대한 연극의 막을 올리는 첫 번째 위대한 도약이야.</text:span><text:span/></text:p>
      <text:p text:style-name="P898"><text:span text:style-name="T1360">🤖 거친 육신이라는 아바타 슈트 착용</text:span><text:span/></text:p>
      <text:p text:style-name="P899"><text:span text:style-name="T1361">자궁에 안착한 의식은 서서히 세포를 키워가며 뼈와 살로 이루어진 거친 육신을 입게 돼. 소프트웨어만 존재하던 상태에서 드디어 단단하고 튼튼한 하드웨어 컴퓨터 본체를 완벽하게 갖추게 되는 셈이지. 이 거친 몸은 우리가 남섬부주라는 물질적 세계의 거친 환경 속에서 부딪히고 배우며 살아갈 수 있도록 도와주는 일종의 고성능 아바타 슈트이자, 생명의 생생한 체험을 가능하게 해주는 소중한 도구란다.</text:span><text:span/></text:p>
      <text:p text:style-name="P900"><text:span text:style-name="T1362">💎 우리 안에 내재된 기본 화신의 비밀</text:span><text:span/></text:p>
      <text:p text:style-name="P901"><text:span text:style-name="T1363">이렇게 자궁에 자리를 잡고 거친 육체를 받아 살아가는 인간의 삶 자체를 가리켜 불교에서는 기본의 화신이라고 불러. 화신이란 깨달은 존재가 중생을 구제하기 위해 물질적인 몸을 입고 세상에 나타나는 것을 뜻하는데, 놀랍게도 우리 모두는 태어나는 순간 이미 그 화신의 완벽한 바탕을 내면에 품고 태어난다는 거야. 평범해 보이는 우리의 일상과 몸뚱이 자체가 사실은 깨달음으로 변화할 수 있는 가장 고귀한 원석이자 기본 설계도인 거지.</text:span><text:span/></text:p>
      <text:p text:style-name="P902"><text:span text:style-name="T1364">🎬 일상의 삶을 깨달음의 기회로 바꾸는 열쇠</text:span><text:span/></text:p>
      <text:p text:style-name="P903"><text:span text:style-name="T1365">결국 우리가 지금 이 거친 몸을 이끌고 밥을 먹고, 사람을 만나고, 슬퍼하고 기뻐하는 이 모든 삶의 과정은 기본 화신이라는 위대한 무대 위에서 펼쳐지는 영적 여정이야. 우리가 입고 있는 이 아바타 슈트가 때로는 무겁고 아프게 느껴질지라도, 이것이 있어야만 비로소 치열하게 수행하고 성장하여 진짜 부처의 화신으로 거듭날 수 있거든. 지금 네가 경험하는 육체와 삶은 영혼의 성장을 위해 우주가 정교하게 허락한 가장 완벽한 훈련소이자 선물이야.</text:span><text:span/></text:p>
      <text:p text:style-name="P904"><text:span text:style-name="T1366">📝 핵심 요약</text:span><text:span/></text:p>
      <text:list text:style-name="WWNum50" text:continue-numbering="true">
        <text:list-item>
          <text:p text:style-name="P905"><text:span text:style-name="T1367">자궁에 탁태하여 거친 육신을 입고 살아가는 인간의 삶의 과정을 기본의 화신이라 부른다.</text:span><text:span/></text:p>
        </text:list-item>
        <text:list-item>
          <text:p text:style-name="P906"><text:span text:style-name="T1368">이는 보이지 않는 의식이 물질 세계와 결합하여 새로운 생명의 무대를 시작함을 뜻한다.</text:span><text:span/></text:p>
        </text:list-item>
        <text:list-item>
          <text:p text:style-name="P907"><text:span text:style-name="T1369">거친 육신은 물질 세계에서 경험하고 배우기 위해 입은 일종의 고성능 아바타 슈트와 같다.</text:span><text:span/></text:p>
        </text:list-item>
        <text:list-item>
          <text:p text:style-name="P908"><text:span text:style-name="T1370">우리의 평범한 삶과 육체는 궁극적인 깨달음의 화신으로 진화할 수 있는 고귀한 근원적 바탕이다.</text:span><text:span/></text:p>
        </text:list-item>
      </text:list>
      <text:p text:style-name="P90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00%" style:tab-stop-distance="35.4pt" fo:margin-top="0pt"/>
      <style:text-properties fo:font-family="Arial" style:font-family-asian="Arial" style:font-family-complex="Arial" fo:font-size="11pt" style:font-size-complex="11pt" fo:language="en" style:language-complex="ar" fo:country="US" style:country-complex="SA"/>
    </style:default-style>
    <style:default-style style:family="text">
      <style:text-properties fo:font-family="Arial" style:font-family-asian="Arial" style:font-family-complex="Arial" fo:font-size="11pt" style:font-size-complex="11pt" fo:language="en" style:language-complex="ar" fo:country="US" style:country-complex="SA"/>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64" style:display-name="Heading 1" style:family="paragraph" style:name="139">
      <style:paragraph-properties fo:margin-top="18pt" fo:margin-bottom="4pt"/>
      <style:text-properties fo:color="#0f4761" fo:font-family="Arial" style:font-family-asian="Arial" style:font-family-complex="Arial" fo:font-size="20pt" style:font-size-complex="20pt"/>
    </style:style>
    <style:style style:parent-style-name="664" style:display-name="Heading 2" style:family="paragraph" style:name="140">
      <style:paragraph-properties fo:margin-top="8pt" fo:margin-bottom="4pt"/>
      <style:text-properties fo:color="#0f4761" fo:font-family="Arial" style:font-family-asian="Arial" style:font-family-complex="Arial" fo:font-size="16pt" style:font-size-complex="16pt"/>
    </style:style>
    <style:style style:parent-style-name="664" style:display-name="Heading 3" style:family="paragraph" style:name="141">
      <style:paragraph-properties fo:margin-top="8pt" fo:margin-bottom="4pt"/>
      <style:text-properties fo:color="#0f4761" fo:font-family="Arial" style:font-family-asian="Arial" style:font-family-complex="Arial" fo:font-size="14pt" style:font-size-complex="14pt"/>
    </style:style>
    <style:style style:parent-style-name="664" style:display-name="Heading 4" style:family="paragraph" style:name="142">
      <style:paragraph-properties fo:margin-top="4pt" fo:margin-bottom="2pt"/>
      <style:text-properties fo:color="#0f4761" fo:font-family="Arial" style:font-family-asian="Arial" style:font-family-complex="Arial" fo:font-style="italic"/>
    </style:style>
    <style:style style:parent-style-name="664" style:display-name="Heading 5" style:family="paragraph" style:name="143">
      <style:paragraph-properties fo:margin-top="4pt" fo:margin-bottom="2pt"/>
      <style:text-properties fo:color="#0f4761" fo:font-family="Arial" style:font-family-asian="Arial" style:font-family-complex="Arial"/>
    </style:style>
    <style:style style:parent-style-name="664" style:display-name="Heading 6" style:family="paragraph" style:name="144">
      <style:paragraph-properties fo:margin-top="2pt" fo:margin-bottom="0pt"/>
      <style:text-properties fo:color="#595959" fo:font-family="Arial" style:font-family-asian="Arial" style:font-family-complex="Arial" fo:font-style="italic"/>
    </style:style>
    <style:style style:parent-style-name="664" style:display-name="Heading 7" style:family="paragraph" style:name="145">
      <style:paragraph-properties fo:margin-top="2pt" fo:margin-bottom="0pt"/>
      <style:text-properties fo:color="#595959" fo:font-family="Arial" style:font-family-asian="Arial" style:font-family-complex="Arial"/>
    </style:style>
    <style:style style:parent-style-name="664" style:display-name="Heading 8" style:family="paragraph" style:name="146">
      <style:paragraph-properties fo:margin-bottom="0pt"/>
      <style:text-properties fo:color="#272727" fo:font-family="Arial" style:font-family-asian="Arial" style:font-family-complex="Arial" fo:font-style="italic"/>
    </style:style>
    <style:style style:parent-style-name="664" style:display-name="Heading 9" style:family="paragraph" style:name="147">
      <style:paragraph-properties fo:margin-bottom="0pt"/>
      <style:text-properties fo:color="#272727" fo:font-family="Arial" style:font-family-asian="Arial" style:font-family-complex="Arial" fo:font-style="italic"/>
    </style:style>
    <style:style style:class="default" style:display-name="Default Paragraph Font" style:family="text" style:name="148">
      <style:paragraph-properties fo:line-height="100%" fo:margin-top="0pt"/>
    </style:style>
    <style:style style:parent-style-name="148" style:display-name="Heading 1 Char" style:family="text" style:name="150">
      <style:paragraph-properties/>
      <style:text-properties fo:color="#0f4761" fo:font-family="Arial" style:font-family-asian="Arial" style:font-family-complex="Arial" fo:font-size="20pt" style:font-size-complex="20pt"/>
    </style:style>
    <style:style style:parent-style-name="148" style:display-name="Heading 2 Char" style:family="text" style:name="151">
      <style:paragraph-properties/>
      <style:text-properties fo:color="#0f4761" fo:font-family="Arial" style:font-family-asian="Arial" style:font-family-complex="Arial" fo:font-size="16pt" style:font-size-complex="16pt"/>
    </style:style>
    <style:style style:parent-style-name="148" style:display-name="Heading 3 Char" style:family="text" style:name="152">
      <style:paragraph-properties/>
      <style:text-properties fo:color="#0f4761" fo:font-family="Arial" style:font-family-asian="Arial" style:font-family-complex="Arial" fo:font-size="14pt" style:font-size-complex="14pt"/>
    </style:style>
    <style:style style:parent-style-name="148" style:display-name="Heading 4 Char" style:family="text" style:name="153">
      <style:paragraph-properties/>
      <style:text-properties fo:color="#0f4761" fo:font-family="Arial" style:font-family-asian="Arial" style:font-family-complex="Arial" fo:font-style="italic"/>
    </style:style>
    <style:style style:parent-style-name="148" style:display-name="Heading 5 Char" style:family="text" style:name="154">
      <style:paragraph-properties/>
      <style:text-properties fo:color="#0f4761" fo:font-family="Arial" style:font-family-asian="Arial" style:font-family-complex="Arial"/>
    </style:style>
    <style:style style:parent-style-name="148" style:display-name="Heading 6 Char" style:family="text" style:name="155">
      <style:paragraph-properties/>
      <style:text-properties fo:color="#595959" fo:font-family="Arial" style:font-family-asian="Arial" style:font-family-complex="Arial" fo:font-style="italic"/>
    </style:style>
    <style:style style:parent-style-name="148" style:display-name="Heading 7 Char" style:family="text" style:name="156">
      <style:paragraph-properties/>
      <style:text-properties fo:color="#595959" fo:font-family="Arial" style:font-family-asian="Arial" style:font-family-complex="Arial"/>
    </style:style>
    <style:style style:parent-style-name="148" style:display-name="Heading 8 Char" style:family="text" style:name="157">
      <style:paragraph-properties/>
      <style:text-properties fo:color="#272727" fo:font-family="Arial" style:font-family-asian="Arial" style:font-family-complex="Arial" fo:font-style="italic"/>
    </style:style>
    <style:style style:parent-style-name="148" style:display-name="Heading 9 Char" style:family="text" style:name="158">
      <style:paragraph-properties/>
      <style:text-properties fo:color="#272727" fo:font-family="Arial" style:font-family-asian="Arial" style:font-family-complex="Arial" fo:font-style="italic"/>
    </style:style>
    <style:style style:parent-style-name="664" style:display-name="Title" style:family="paragraph" style:name="159">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148" style:display-name="Title Char" style:family="text" style:name="160">
      <style:paragraph-properties/>
      <style:text-properties fo:font-family="Arial" style:font-family-asian="Arial" style:font-family-complex="Arial" fo:font-size="28pt" style:font-size-complex="28pt" fo:letter-spacing="-0.5pt"/>
    </style:style>
    <style:style style:parent-style-name="664" style:display-name="Subtitle" style:family="paragraph" style:name="161">
      <style:paragraph-properties/>
      <style:text-properties fo:color="#595959" fo:font-size="14pt" style:font-size-complex="14pt" fo:letter-spacing="0.75pt"/>
    </style:style>
    <style:style style:parent-style-name="148" style:display-name="Subtitle Char" style:family="text" style:name="162">
      <style:paragraph-properties/>
      <style:text-properties fo:color="#595959" fo:font-size="14pt" style:font-size-complex="14pt" fo:letter-spacing="0.75pt"/>
    </style:style>
    <style:style style:parent-style-name="664" style:display-name="Quote" style:family="paragraph" style:name="163">
      <style:paragraph-properties fo:text-align="center" fo:margin-top="8pt"/>
      <style:text-properties fo:color="#404040" fo:font-style="italic"/>
    </style:style>
    <style:style style:parent-style-name="148" style:display-name="Quote Char" style:family="text" style:name="164">
      <style:paragraph-properties/>
      <style:text-properties fo:color="#404040" fo:font-style="italic"/>
    </style:style>
    <style:style style:parent-style-name="148" style:display-name="Intense Emphasis" style:family="text" style:name="166">
      <style:paragraph-properties/>
      <style:text-properties fo:color="#0f4761" fo:font-style="italic"/>
    </style:style>
    <style:style style:parent-style-name="664"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8" style:display-name="Intense Quote Char" style:family="text" style:name="168">
      <style:paragraph-properties/>
      <style:text-properties fo:color="#0f4761" fo:font-style="italic"/>
    </style:style>
    <style:style style:parent-style-name="148" style:display-name="Intense Reference" style:family="text" style:name="169">
      <style:paragraph-properties/>
      <style:text-properties fo:font-variant="small-caps" fo:color="#0f4761" fo:letter-spacing="0.25pt" fo:font-weight="bold"/>
    </style:style>
    <style:style style:parent-style-name="148" style:display-name="Subtle Emphasis" style:family="text" style:name="171">
      <style:paragraph-properties/>
      <style:text-properties fo:color="#404040" fo:font-style="italic"/>
    </style:style>
    <style:style style:parent-style-name="148" style:display-name="Emphasis" style:family="text" style:name="172">
      <style:paragraph-properties/>
      <style:text-properties fo:font-style="italic"/>
    </style:style>
    <style:style style:parent-style-name="148" style:display-name="Strong" style:family="text" style:name="173">
      <style:paragraph-properties/>
      <style:text-properties fo:font-weight="bold"/>
    </style:style>
    <style:style style:parent-style-name="148" style:display-name="Subtle Reference" style:family="text" style:name="174">
      <style:paragraph-properties/>
      <style:text-properties fo:font-variant="small-caps" fo:color="#5a5a5a"/>
    </style:style>
    <style:style style:parent-style-name="148" style:display-name="Book Title" style:family="text" style:name="175">
      <style:paragraph-properties/>
      <style:text-properties fo:letter-spacing="0.25pt" fo:font-style="italic" fo:font-weight="bold"/>
    </style:style>
    <style:style style:parent-style-name="664" style:display-name="Header" style:family="paragraph" style:name="176">
      <style:paragraph-properties fo:line-height="100%" fo:margin-bottom="0pt">
        <style:tab-stops>
          <style:tab-stop style:position="8.545cm" style:type="center"/>
          <style:tab-stop style:position="17.09cm" style:type="right"/>
        </style:tab-stops>
      </style:paragraph-properties>
    </style:style>
    <style:style style:parent-style-name="148" style:display-name="Header Char" style:family="text" style:name="177">
      <style:paragraph-properties/>
    </style:style>
    <style:style style:parent-style-name="664" style:display-name="Footer" style:family="paragraph" style:name="178">
      <style:paragraph-properties fo:line-height="100%" fo:margin-bottom="0pt">
        <style:tab-stops>
          <style:tab-stop style:position="8.545cm" style:type="center"/>
          <style:tab-stop style:position="17.09cm" style:type="right"/>
        </style:tab-stops>
      </style:paragraph-properties>
    </style:style>
    <style:style style:parent-style-name="148" style:display-name="Footer Char" style:family="text" style:name="179">
      <style:paragraph-properties/>
    </style:style>
    <style:style style:parent-style-name="664" style:display-name="Caption" style:family="paragraph" style:name="180">
      <style:paragraph-properties fo:line-height="100%" fo:margin-bottom="10pt"/>
      <style:text-properties fo:color="#0e2841" fo:font-size="9pt" style:font-size-complex="9pt" fo:font-style="italic"/>
    </style:style>
    <style:style style:parent-style-name="664" style:display-name="footnote text" style:family="paragraph" style:name="181">
      <style:paragraph-properties fo:line-height="100%" fo:margin-bottom="0pt"/>
      <style:text-properties fo:font-size="10pt" style:font-size-complex="10pt"/>
    </style:style>
    <style:style style:parent-style-name="148" style:display-name="Footnote Text Char" style:family="text" style:name="182">
      <style:paragraph-properties/>
      <style:text-properties fo:font-size="10pt" style:font-size-complex="10pt"/>
    </style:style>
    <style:style style:parent-style-name="148" style:display-name="footnote reference" style:family="text" style:name="183">
      <style:paragraph-properties/>
      <style:text-properties style:text-position="super 58%"/>
    </style:style>
    <style:style style:parent-style-name="664" style:display-name="endnote text" style:family="paragraph" style:name="184">
      <style:paragraph-properties fo:line-height="100%" fo:margin-bottom="0pt"/>
      <style:text-properties fo:font-size="10pt" style:font-size-complex="10pt"/>
    </style:style>
    <style:style style:parent-style-name="148" style:display-name="Endnote Text Char" style:family="text" style:name="185">
      <style:paragraph-properties/>
      <style:text-properties fo:font-size="10pt" style:font-size-complex="10pt"/>
    </style:style>
    <style:style style:parent-style-name="148" style:display-name="endnote reference" style:family="text" style:name="186">
      <style:paragraph-properties/>
      <style:text-properties style:text-position="super 58%"/>
    </style:style>
    <style:style style:parent-style-name="148"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8"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664" style:display-name="toc 1" style:family="paragraph" style:name="189">
      <style:paragraph-properties fo:margin-bottom="5pt"/>
    </style:style>
    <style:style style:parent-style-name="664" style:display-name="toc 2" style:family="paragraph" style:name="190">
      <style:paragraph-properties fo:margin-left="0.3881cm" fo:margin-bottom="5pt"/>
    </style:style>
    <style:style style:parent-style-name="664" style:display-name="toc 3" style:family="paragraph" style:name="191">
      <style:paragraph-properties fo:margin-left="0.7762cm" fo:margin-bottom="5pt"/>
    </style:style>
    <style:style style:parent-style-name="664" style:display-name="toc 4" style:family="paragraph" style:name="192">
      <style:paragraph-properties fo:margin-left="1.164cm" fo:margin-bottom="5pt"/>
    </style:style>
    <style:style style:parent-style-name="664" style:display-name="toc 5" style:family="paragraph" style:name="193">
      <style:paragraph-properties fo:margin-left="1.552cm" fo:margin-bottom="5pt"/>
    </style:style>
    <style:style style:parent-style-name="664" style:display-name="toc 6" style:family="paragraph" style:name="194">
      <style:paragraph-properties fo:margin-left="1.94cm" fo:margin-bottom="5pt"/>
    </style:style>
    <style:style style:parent-style-name="664" style:display-name="toc 7" style:family="paragraph" style:name="195">
      <style:paragraph-properties fo:margin-left="2.328cm" fo:margin-bottom="5pt"/>
    </style:style>
    <style:style style:parent-style-name="664" style:display-name="toc 8" style:family="paragraph" style:name="196">
      <style:paragraph-properties fo:margin-left="2.717cm" fo:margin-bottom="5pt"/>
    </style:style>
    <style:style style:parent-style-name="664" style:display-name="toc 9" style:family="paragraph" style:name="197">
      <style:paragraph-properties fo:margin-left="3.105cm" fo:margin-bottom="5pt"/>
    </style:style>
    <style:style style:parent-style-name="148" style:display-name="Placeholder Text" style:family="text" style:name="198">
      <style:paragraph-properties/>
      <style:text-properties fo:color="#666666"/>
    </style:style>
    <style:style style:display-name="TOC Heading" style:family="paragraph" style:name="208">
      <style:paragraph-properties/>
    </style:style>
    <style:style style:parent-style-name="664" style:display-name="table of figures" style:family="paragraph" style:name="209">
      <style:paragraph-properties fo:margin-bottom="0pt"/>
    </style:style>
    <style:style style:class="default" style:display-name="Normal" style:family="paragraph" style:name="664">
      <style:paragraph-properties fo:line-height="100%" fo:margin-top="0pt"/>
      <style:text-properties/>
    </style:style>
    <style:style style:parent-style-name="664" style:display-name="No Spacing" style:family="paragraph" style:name="667">
      <style:paragraph-properties fo:line-height="100%" fo:margin-bottom="0pt"/>
    </style:style>
    <style:style style:parent-style-name="664" style:display-name="List Paragraph" style:family="paragraph" style:name="668">
      <style:paragraph-properties fo:margin-left="1.27cm" style:contextual-spacing="true"/>
      <style:text-properties/>
    </style:style>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Symbol" style:font-family-asian="Symbol" style:font-family-complex="Symbo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fo:font-family="Symbol" style:font-family-asian="Symbol" style:font-family-complex="Symbo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Symbol" style:font-family-asian="Symbol" style:font-family-complex="Symbol"/>
    </style:style>
    <style:style style:family="text" style:name="T92">
      <style:text-properties fo:font-family="Courier New" style:font-family-asian="Courier New" style:font-family-complex="Courier New"/>
    </style:style>
    <style:style style:family="text" style:name="T93">
      <style:text-properties fo:font-family="Wingdings" style:font-family-asian="Wingdings" style:font-family-complex="Wingdings"/>
    </style:style>
    <style:style style:family="text" style:name="T94">
      <style:text-properties fo:font-family="Symbol" style:font-family-asian="Symbol" style:font-family-complex="Symbol"/>
    </style:style>
    <style:style style:family="text" style:name="T95">
      <style:text-properties fo:font-family="Courier New" style:font-family-asian="Courier New" style:font-family-complex="Courier New"/>
    </style:style>
    <style:style style:family="text" style:name="T96">
      <style:text-properties fo:font-family="Wingdings" style:font-family-asian="Wingdings" style:font-family-complex="Wingdings"/>
    </style:style>
    <style:style style:family="text" style:name="T97">
      <style:text-properties fo:font-family="Symbol" style:font-family-asian="Symbol" style:font-family-complex="Symbol"/>
    </style:style>
    <style:style style:family="text" style:name="T98">
      <style:text-properties fo:font-family="Courier New" style:font-family-asian="Courier New" style:font-family-complex="Courier New"/>
    </style:style>
    <style:style style:family="text" style:name="T99">
      <style:text-properties fo:font-family="Wingdings" style:font-family-asian="Wingdings" style:font-family-complex="Wingdings"/>
    </style:style>
    <style:style style:family="text" style:name="T100">
      <style:text-properties fo:font-family="Symbol" style:font-family-asian="Symbol" style:font-family-complex="Symbol"/>
    </style:style>
    <style:style style:family="text" style:name="T101">
      <style:text-properties fo:font-family="Courier New" style:font-family-asian="Courier New" style:font-family-complex="Courier New"/>
    </style:style>
    <style:style style:family="text" style:name="T102">
      <style:text-properties fo:font-family="Wingdings" style:font-family-asian="Wingdings" style:font-family-complex="Wingdings"/>
    </style:style>
    <style:style style:family="text" style:name="T103">
      <style:text-properties fo:font-family="Symbol" style:font-family-asian="Symbol" style:font-family-complex="Symbol"/>
    </style:style>
    <style:style style:family="text" style:name="T104">
      <style:text-properties fo:font-family="Courier New" style:font-family-asian="Courier New" style:font-family-complex="Courier New"/>
    </style:style>
    <style:style style:family="text" style:name="T105">
      <style:text-properties fo:font-family="Wingdings" style:font-family-asian="Wingdings" style:font-family-complex="Wingdings"/>
    </style:style>
    <style:style style:family="text" style:name="T106">
      <style:text-properties fo:font-family="Symbol" style:font-family-asian="Symbol" style:font-family-complex="Symbol"/>
    </style:style>
    <style:style style:family="text" style:name="T107">
      <style:text-properties fo:font-family="Courier New" style:font-family-asian="Courier New" style:font-family-complex="Courier New"/>
    </style:style>
    <style:style style:family="text" style:name="T108">
      <style:text-properties fo:font-family="Wingdings" style:font-family-asian="Wingdings" style:font-family-complex="Wingdings"/>
    </style:style>
    <style:style style:family="text" style:name="T109">
      <style:text-properties fo:font-family="Symbol" style:font-family-asian="Symbol" style:font-family-complex="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style:style style:family="text" style:name="T118">
      <style:text-properties fo:font-family="Symbol" style:font-family-asian="Symbol" style:font-family-complex="Symbol"/>
    </style:style>
    <style:style style:family="text" style:name="T119">
      <style:text-properties fo:font-family="Courier New" style:font-family-asian="Courier New" style:font-family-complex="Courier New"/>
    </style:style>
    <style:style style:family="text" style:name="T120">
      <style:text-properties fo:font-family="Wingdings" style:font-family-asian="Wingdings" style:font-family-complex="Wingdings"/>
    </style:style>
    <style:style style:family="text" style:name="T121">
      <style:text-properties fo:font-family="Symbol" style:font-family-asian="Symbol" style:font-family-complex="Symbol"/>
    </style:style>
    <style:style style:family="text" style:name="T122">
      <style:text-properties fo:font-family="Courier New" style:font-family-asian="Courier New" style:font-family-complex="Courier New"/>
    </style:style>
    <style:style style:family="text" style:name="T123">
      <style:text-properties fo:font-family="Wingdings" style:font-family-asian="Wingdings" style:font-family-complex="Wingdings"/>
    </style:style>
    <style:style style:family="text" style:name="T124">
      <style:text-properties fo:font-family="Symbol" style:font-family-asian="Symbol" style:font-family-complex="Symbol"/>
    </style:style>
    <style:style style:family="text" style:name="T125">
      <style:text-properties fo:font-family="Courier New" style:font-family-asian="Courier New" style:font-family-complex="Courier New"/>
    </style:style>
    <style:style style:family="text" style:name="T126">
      <style:text-properties fo:font-family="Wingdings" style:font-family-asian="Wingdings" style:font-family-complex="Wingdings"/>
    </style:style>
    <style:style style:family="text" style:name="T127">
      <style:text-properties fo:font-family="Symbol" style:font-family-asian="Symbol" style:font-family-complex="Symbol"/>
    </style:style>
    <style:style style:family="text" style:name="T128">
      <style:text-properties fo:font-family="Courier New" style:font-family-asian="Courier New" style:font-family-complex="Courier New"/>
    </style:style>
    <style:style style:family="text" style:name="T129">
      <style:text-properties fo:font-family="Wingdings" style:font-family-asian="Wingdings" style:font-family-complex="Wingdings"/>
    </style:style>
    <style:style style:family="text" style:name="T130">
      <style:text-properties fo:font-family="Symbol" style:font-family-asian="Symbol" style:font-family-complex="Symbol"/>
    </style:style>
    <style:style style:family="text" style:name="T131">
      <style:text-properties fo:font-family="Courier New" style:font-family-asian="Courier New" style:font-family-complex="Courier New"/>
    </style:style>
    <style:style style:family="text" style:name="T132">
      <style:text-properties fo:font-family="Wingdings" style:font-family-asian="Wingdings" style:font-family-complex="Wingdings"/>
    </style:style>
    <style:style style:family="text" style:name="T133">
      <style:text-properties fo:font-family="Symbol" style:font-family-asian="Symbol" style:font-family-complex="Symbol"/>
    </style:style>
    <style:style style:family="text" style:name="T134">
      <style:text-properties fo:font-family="Courier New" style:font-family-asian="Courier New" style:font-family-complex="Courier New"/>
    </style:style>
    <style:style style:family="text" style:name="T135">
      <style:text-properties fo:font-family="Wingdings" style:font-family-asian="Wingdings" style:font-family-complex="Wingdings"/>
    </style:style>
    <style:style style:family="text" style:name="T136">
      <style:text-properties fo:font-family="Symbol" style:font-family-asian="Symbol" style:font-family-complex="Symbol"/>
    </style:style>
    <style:style style:family="text" style:name="T137">
      <style:text-properties fo:font-family="Courier New" style:font-family-asian="Courier New" style:font-family-complex="Courier New"/>
    </style:style>
    <style:style style:family="text" style:name="T138">
      <style:text-properties fo:font-family="Wingdings" style:font-family-asian="Wingdings" style:font-family-complex="Wingdings"/>
    </style:style>
    <style:style style:family="text" style:name="T139">
      <style:text-properties fo:font-family="Symbol" style:font-family-asian="Symbol" style:font-family-complex="Symbol"/>
    </style:style>
    <style:style style:family="text" style:name="T140">
      <style:text-properties fo:font-family="Courier New" style:font-family-asian="Courier New" style:font-family-complex="Courier New"/>
    </style:style>
    <style:style style:family="text" style:name="T141">
      <style:text-properties fo:font-family="Wingdings" style:font-family-asian="Wingdings" style:font-family-complex="Wingdings"/>
    </style:style>
    <style:style style:family="text" style:name="T142">
      <style:text-properties fo:font-family="Symbol" style:font-family-asian="Symbol" style:font-family-complex="Symbol"/>
    </style:style>
    <style:style style:family="text" style:name="T143">
      <style:text-properties fo:font-family="Courier New" style:font-family-asian="Courier New" style:font-family-complex="Courier New"/>
    </style:style>
    <style:style style:family="text" style:name="T144">
      <style:text-properties fo:font-family="Wingdings" style:font-family-asian="Wingdings" style:font-family-complex="Wingdings"/>
    </style:style>
    <style:style style:family="text" style:name="T145">
      <style:text-properties fo:font-family="Symbol" style:font-family-asian="Symbol" style:font-family-complex="Symbol"/>
    </style:style>
    <style:style style:family="text" style:name="T146">
      <style:text-properties fo:font-family="Courier New" style:font-family-asian="Courier New" style:font-family-complex="Courier New"/>
    </style:style>
    <style:style style:family="text" style:name="T147">
      <style:text-properties fo:font-family="Wingdings" style:font-family-asian="Wingdings" style:font-family-complex="Wingdings"/>
    </style:style>
    <style:style style:family="text" style:name="T148">
      <style:text-properties fo:font-family="Symbol" style:font-family-asian="Symbol" style:font-family-complex="Symbol"/>
    </style:style>
    <style:style style:family="text" style:name="T149">
      <style:text-properties fo:font-family="Courier New" style:font-family-asian="Courier New" style:font-family-complex="Courier New"/>
    </style:style>
    <style:style style:family="text" style:name="T150">
      <style:text-properties fo:font-family="Wingdings" style:font-family-asian="Wingdings" style:font-family-complex="Wingdings"/>
    </style:style>
    <style:style style:family="text" style:name="T151">
      <style:text-properties fo:font-family="Symbol" style:font-family-asian="Symbol" style:font-family-complex="Symbol"/>
    </style:style>
    <style:style style:family="text" style:name="T152">
      <style:text-properties fo:font-family="Courier New" style:font-family-asian="Courier New" style:font-family-complex="Courier New"/>
    </style:style>
    <style:style style:family="text" style:name="T153">
      <style:text-properties fo:font-family="Wingdings" style:font-family-asian="Wingdings" style:font-family-complex="Wingdings"/>
    </style:style>
    <style:style style:family="text" style:name="T154">
      <style:text-properties fo:font-family="Symbol" style:font-family-asian="Symbol" style:font-family-complex="Symbol"/>
    </style:style>
    <style:style style:family="text" style:name="T155">
      <style:text-properties fo:font-family="Courier New" style:font-family-asian="Courier New" style:font-family-complex="Courier New"/>
    </style:style>
    <style:style style:family="text" style:name="T156">
      <style:text-properties fo:font-family="Wingdings" style:font-family-asian="Wingdings" style:font-family-complex="Wingdings"/>
    </style:style>
    <style:style style:family="text" style:name="T157">
      <style:text-properties fo:font-family="Symbol" style:font-family-asian="Symbol" style:font-family-complex="Symbol"/>
    </style:style>
    <style:style style:family="text" style:name="T158">
      <style:text-properties fo:font-family="Courier New" style:font-family-asian="Courier New" style:font-family-complex="Courier New"/>
    </style:style>
    <style:style style:family="text" style:name="T159">
      <style:text-properties fo:font-family="Wingdings" style:font-family-asian="Wingdings" style:font-family-complex="Wingdings"/>
    </style:style>
    <style:style style:family="text" style:name="T160">
      <style:text-properties fo:font-family="Symbol" style:font-family-asian="Symbol" style:font-family-complex="Symbol"/>
    </style:style>
    <style:style style:family="text" style:name="T161">
      <style:text-properties fo:font-family="Courier New" style:font-family-asian="Courier New" style:font-family-complex="Courier New"/>
    </style:style>
    <style:style style:family="text" style:name="T162">
      <style:text-properties fo:font-family="Wingdings" style:font-family-asian="Wingdings" style:font-family-complex="Wingdings"/>
    </style:style>
    <style:style style:family="text" style:name="T163">
      <style:text-properties fo:font-family="Symbol" style:font-family-asian="Symbol" style:font-family-complex="Symbol"/>
    </style:style>
    <style:style style:family="text" style:name="T164">
      <style:text-properties fo:font-family="Courier New" style:font-family-asian="Courier New" style:font-family-complex="Courier New"/>
    </style:style>
    <style:style style:family="text" style:name="T165">
      <style:text-properties fo:font-family="Wingdings" style:font-family-asian="Wingdings" style:font-family-complex="Wingdings"/>
    </style:style>
    <style:style style:family="text" style:name="T166">
      <style:text-properties fo:font-family="Symbol" style:font-family-asian="Symbol" style:font-family-complex="Symbol"/>
    </style:style>
    <style:style style:family="text" style:name="T167">
      <style:text-properties fo:font-family="Courier New" style:font-family-asian="Courier New" style:font-family-complex="Courier New"/>
    </style:style>
    <style:style style:family="text" style:name="T168">
      <style:text-properties fo:font-family="Wingdings" style:font-family-asian="Wingdings" style:font-family-complex="Wingdings"/>
    </style:style>
    <style:style style:family="text" style:name="T169">
      <style:text-properties fo:font-family="Symbol" style:font-family-asian="Symbol" style:font-family-complex="Symbol"/>
    </style:style>
    <style:style style:family="text" style:name="T170">
      <style:text-properties fo:font-family="Courier New" style:font-family-asian="Courier New" style:font-family-complex="Courier New"/>
    </style:style>
    <style:style style:family="text" style:name="T171">
      <style:text-properties fo:font-family="Wingdings" style:font-family-asian="Wingdings" style:font-family-complex="Wingdings"/>
    </style:style>
    <style:style style:family="text" style:name="T172">
      <style:text-properties fo:font-family="Symbol" style:font-family-asian="Symbol" style:font-family-complex="Symbol"/>
    </style:style>
    <style:style style:family="text" style:name="T173">
      <style:text-properties fo:font-family="Courier New" style:font-family-asian="Courier New" style:font-family-complex="Courier New"/>
    </style:style>
    <style:style style:family="text" style:name="T174">
      <style:text-properties fo:font-family="Wingdings" style:font-family-asian="Wingdings" style:font-family-complex="Wingdings"/>
    </style:style>
    <style:style style:family="text" style:name="T175">
      <style:text-properties fo:font-family="Symbol" style:font-family-asian="Symbol" style:font-family-complex="Symbol"/>
    </style:style>
    <style:style style:family="text" style:name="T176">
      <style:text-properties fo:font-family="Courier New" style:font-family-asian="Courier New" style:font-family-complex="Courier New"/>
    </style:style>
    <style:style style:family="text" style:name="T177">
      <style:text-properties fo:font-family="Wingdings" style:font-family-asian="Wingdings" style:font-family-complex="Wingdings"/>
    </style:style>
    <style:style style:family="text" style:name="T178">
      <style:text-properties fo:font-family="Symbol" style:font-family-asian="Symbol" style:font-family-complex="Symbol"/>
    </style:style>
    <style:style style:family="text" style:name="T179">
      <style:text-properties fo:font-family="Courier New" style:font-family-asian="Courier New" style:font-family-complex="Courier New"/>
    </style:style>
    <style:style style:family="text" style:name="T180">
      <style:text-properties fo:font-family="Wingdings" style:font-family-asian="Wingdings" style:font-family-complex="Wingdings"/>
    </style:style>
    <style:style style:family="text" style:name="T181">
      <style:text-properties fo:font-family="Symbol" style:font-family-asian="Symbol" style:font-family-complex="Symbol"/>
    </style:style>
    <style:style style:family="text" style:name="T182">
      <style:text-properties fo:font-family="Courier New" style:font-family-asian="Courier New" style:font-family-complex="Courier New"/>
    </style:style>
    <style:style style:family="text" style:name="T183">
      <style:text-properties fo:font-family="Wingdings" style:font-family-asian="Wingdings" style:font-family-complex="Wingdings"/>
    </style:style>
    <style:style style:family="text" style:name="T184">
      <style:text-properties fo:font-family="Symbol" style:font-family-asian="Symbol" style:font-family-complex="Symbol"/>
    </style:style>
    <style:style style:family="text" style:name="T185">
      <style:text-properties fo:font-family="Courier New" style:font-family-asian="Courier New" style:font-family-complex="Courier New"/>
    </style:style>
    <style:style style:family="text" style:name="T186">
      <style:text-properties fo:font-family="Wingdings" style:font-family-asian="Wingdings" style:font-family-complex="Wingdings"/>
    </style:style>
    <style:style style:family="text" style:name="T187">
      <style:text-properties fo:font-family="Symbol" style:font-family-asian="Symbol" style:font-family-complex="Symbol"/>
    </style:style>
    <style:style style:family="text" style:name="T188">
      <style:text-properties fo:font-family="Courier New" style:font-family-asian="Courier New" style:font-family-complex="Courier New"/>
    </style:style>
    <style:style style:family="text" style:name="T189">
      <style:text-properties fo:font-family="Wingdings" style:font-family-asian="Wingdings" style:font-family-complex="Wingdings"/>
    </style:style>
    <style:style style:family="text" style:name="T190">
      <style:text-properties fo:font-family="Symbol" style:font-family-asian="Symbol" style:font-family-complex="Symbol"/>
    </style:style>
    <style:style style:family="text" style:name="T191">
      <style:text-properties fo:font-family="Courier New" style:font-family-asian="Courier New" style:font-family-complex="Courier New"/>
    </style:style>
    <style:style style:family="text" style:name="T192">
      <style:text-properties fo:font-family="Wingdings" style:font-family-asian="Wingdings" style:font-family-complex="Wingdings"/>
    </style:style>
    <style:style style:family="text" style:name="T193">
      <style:text-properties fo:font-family="Symbol" style:font-family-asian="Symbol" style:font-family-complex="Symbol"/>
    </style:style>
    <style:style style:family="text" style:name="T194">
      <style:text-properties fo:font-family="Courier New" style:font-family-asian="Courier New" style:font-family-complex="Courier New"/>
    </style:style>
    <style:style style:family="text" style:name="T195">
      <style:text-properties fo:font-family="Wingdings" style:font-family-asian="Wingdings" style:font-family-complex="Wingdings"/>
    </style:style>
    <style:style style:family="text" style:name="T196">
      <style:text-properties fo:font-family="Symbol" style:font-family-asian="Symbol" style:font-family-complex="Symbol"/>
    </style:style>
    <style:style style:family="text" style:name="T197">
      <style:text-properties fo:font-family="Courier New" style:font-family-asian="Courier New" style:font-family-complex="Courier New"/>
    </style:style>
    <style:style style:family="text" style:name="T198">
      <style:text-properties fo:font-family="Wingdings" style:font-family-asian="Wingdings" style:font-family-complex="Wingdings"/>
    </style:style>
    <style:style style:family="text" style:name="T199">
      <style:text-properties fo:font-family="Symbol" style:font-family-asian="Symbol" style:font-family-complex="Symbol"/>
    </style:style>
    <style:style style:family="text" style:name="T200">
      <style:text-properties fo:font-family="Courier New" style:font-family-asian="Courier New" style:font-family-complex="Courier New"/>
    </style:style>
    <style:style style:family="text" style:name="T201">
      <style:text-properties fo:font-family="Wingdings" style:font-family-asian="Wingdings" style:font-family-complex="Wingdings"/>
    </style:style>
    <style:style style:family="text" style:name="T202">
      <style:text-properties fo:font-family="Symbol" style:font-family-asian="Symbol" style:font-family-complex="Symbol"/>
    </style:style>
    <style:style style:family="text" style:name="T203">
      <style:text-properties fo:font-family="Courier New" style:font-family-asian="Courier New" style:font-family-complex="Courier New"/>
    </style:style>
    <style:style style:family="text" style:name="T204">
      <style:text-properties fo:font-family="Wingdings" style:font-family-asian="Wingdings" style:font-family-complex="Wingdings"/>
    </style:style>
    <style:style style:family="text" style:name="T205">
      <style:text-properties fo:font-family="Symbol" style:font-family-asian="Symbol" style:font-family-complex="Symbol"/>
    </style:style>
    <style:style style:family="text" style:name="T206">
      <style:text-properties fo:font-family="Courier New" style:font-family-asian="Courier New" style:font-family-complex="Courier New"/>
    </style:style>
    <style:style style:family="text" style:name="T207">
      <style:text-properties fo:font-family="Wingdings" style:font-family-asian="Wingdings" style:font-family-complex="Wingdings"/>
    </style:style>
    <style:style style:family="text" style:name="T208">
      <style:text-properties fo:font-family="Symbol" style:font-family-asian="Symbol" style:font-family-complex="Symbol"/>
    </style:style>
    <style:style style:family="text" style:name="T209">
      <style:text-properties fo:font-family="Courier New" style:font-family-asian="Courier New" style:font-family-complex="Courier New"/>
    </style:style>
    <style:style style:family="text" style:name="T210">
      <style:text-properties fo:font-family="Wingdings" style:font-family-asian="Wingdings" style:font-family-complex="Wingdings"/>
    </style:style>
    <style:style style:family="text" style:name="T211">
      <style:text-properties fo:font-family="Symbol" style:font-family-asian="Symbol" style:font-family-complex="Symbol"/>
    </style:style>
    <style:style style:family="text" style:name="T212">
      <style:text-properties fo:font-family="Courier New" style:font-family-asian="Courier New" style:font-family-complex="Courier New"/>
    </style:style>
    <style:style style:family="text" style:name="T213">
      <style:text-properties fo:font-family="Wingdings" style:font-family-asian="Wingdings" style:font-family-complex="Wingdings"/>
    </style:style>
    <style:style style:family="text" style:name="T214">
      <style:text-properties fo:font-family="Symbol" style:font-family-asian="Symbol" style:font-family-complex="Symbol"/>
    </style:style>
    <style:style style:family="text" style:name="T215">
      <style:text-properties fo:font-family="Courier New" style:font-family-asian="Courier New" style:font-family-complex="Courier New"/>
    </style:style>
    <style:style style:family="text" style:name="T216">
      <style:text-properties fo:font-family="Wingdings" style:font-family-asian="Wingdings" style:font-family-complex="Wingdings"/>
    </style:style>
    <style:style style:family="text" style:name="T217">
      <style:text-properties fo:font-family="Symbol" style:font-family-asian="Symbol" style:font-family-complex="Symbol"/>
    </style:style>
    <style:style style:family="text" style:name="T218">
      <style:text-properties fo:font-family="Courier New" style:font-family-asian="Courier New" style:font-family-complex="Courier New"/>
    </style:style>
    <style:style style:family="text" style:name="T219">
      <style:text-properties fo:font-family="Wingdings" style:font-family-asian="Wingdings" style:font-family-complex="Wingdings"/>
    </style:style>
    <style:style style:family="text" style:name="T220">
      <style:text-properties fo:font-family="Symbol" style:font-family-asian="Symbol" style:font-family-complex="Symbol"/>
    </style:style>
    <style:style style:family="text" style:name="T221">
      <style:text-properties fo:font-family="Courier New" style:font-family-asian="Courier New" style:font-family-complex="Courier New"/>
    </style:style>
    <style:style style:family="text" style:name="T222">
      <style:text-properties fo:font-family="Wingdings" style:font-family-asian="Wingdings" style:font-family-complex="Wingdings"/>
    </style:style>
    <style:style style:family="text" style:name="T223">
      <style:text-properties fo:font-family="Symbol" style:font-family-asian="Symbol" style:font-family-complex="Symbol"/>
    </style:style>
    <style:style style:family="text" style:name="T224">
      <style:text-properties fo:font-family="Courier New" style:font-family-asian="Courier New" style:font-family-complex="Courier New"/>
    </style:style>
    <style:style style:family="text" style:name="T225">
      <style:text-properties fo:font-family="Wingdings" style:font-family-asian="Wingdings" style:font-family-complex="Wingdings"/>
    </style:style>
    <style:style style:family="text" style:name="T226">
      <style:text-properties fo:font-family="Symbol" style:font-family-asian="Symbol" style:font-family-complex="Symbol"/>
    </style:style>
    <style:style style:family="text" style:name="T227">
      <style:text-properties fo:font-family="Courier New" style:font-family-asian="Courier New" style:font-family-complex="Courier New"/>
    </style:style>
    <style:style style:family="text" style:name="T228">
      <style:text-properties fo:font-family="Wingdings" style:font-family-asian="Wingdings" style:font-family-complex="Wingdings"/>
    </style:style>
    <style:style style:family="text" style:name="T229">
      <style:text-properties fo:font-family="Symbol" style:font-family-asian="Symbol" style:font-family-complex="Symbol"/>
    </style:style>
    <style:style style:family="text" style:name="T230">
      <style:text-properties fo:font-family="Courier New" style:font-family-asian="Courier New" style:font-family-complex="Courier New"/>
    </style:style>
    <style:style style:family="text" style:name="T231">
      <style:text-properties fo:font-family="Wingdings" style:font-family-asian="Wingdings" style:font-family-complex="Wingdings"/>
    </style:style>
    <style:style style:family="text" style:name="T232">
      <style:text-properties fo:font-family="Symbol" style:font-family-asian="Symbol" style:font-family-complex="Symbol"/>
    </style:style>
    <style:style style:family="text" style:name="T233">
      <style:text-properties fo:font-family="Courier New" style:font-family-asian="Courier New" style:font-family-complex="Courier New"/>
    </style:style>
    <style:style style:family="text" style:name="T234">
      <style:text-properties fo:font-family="Wingdings" style:font-family-asian="Wingdings" style:font-family-complex="Wingdings"/>
    </style:style>
    <style:style style:family="text" style:name="T235">
      <style:text-properties fo:font-family="Symbol" style:font-family-asian="Symbol" style:font-family-complex="Symbol"/>
    </style:style>
    <style:style style:family="text" style:name="T236">
      <style:text-properties fo:font-family="Courier New" style:font-family-asian="Courier New" style:font-family-complex="Courier New"/>
    </style:style>
    <style:style style:family="text" style:name="T237">
      <style:text-properties fo:font-family="Wingdings" style:font-family-asian="Wingdings" style:font-family-complex="Wingdings"/>
    </style:style>
    <style:style style:family="text" style:name="T238">
      <style:text-properties fo:font-family="Symbol" style:font-family-asian="Symbol" style:font-family-complex="Symbol"/>
    </style:style>
    <style:style style:family="text" style:name="T239">
      <style:text-properties fo:font-family="Courier New" style:font-family-asian="Courier New" style:font-family-complex="Courier New"/>
    </style:style>
    <style:style style:family="text" style:name="T240">
      <style:text-properties fo:font-family="Wingdings" style:font-family-asian="Wingdings" style:font-family-complex="Wingdings"/>
    </style:style>
    <style:style style:family="text" style:name="T241">
      <style:text-properties fo:font-family="Symbol" style:font-family-asian="Symbol" style:font-family-complex="Symbol"/>
    </style:style>
    <style:style style:family="text" style:name="T242">
      <style:text-properties fo:font-family="Courier New" style:font-family-asian="Courier New" style:font-family-complex="Courier New"/>
    </style:style>
    <style:style style:family="text" style:name="T243">
      <style:text-properties fo:font-family="Wingdings" style:font-family-asian="Wingdings" style:font-family-complex="Wingdings"/>
    </style:style>
    <style:style style:family="text" style:name="T244">
      <style:text-properties fo:font-family="Symbol" style:font-family-asian="Symbol" style:font-family-complex="Symbol"/>
    </style:style>
    <style:style style:family="text" style:name="T245">
      <style:text-properties fo:font-family="Courier New" style:font-family-asian="Courier New" style:font-family-complex="Courier New"/>
    </style:style>
    <style:style style:family="text" style:name="T246">
      <style:text-properties fo:font-family="Wingdings" style:font-family-asian="Wingdings" style:font-family-complex="Wingdings"/>
    </style:style>
    <style:style style:family="text" style:name="T247">
      <style:text-properties fo:font-family="Symbol" style:font-family-asian="Symbol" style:font-family-complex="Symbol"/>
    </style:style>
    <style:style style:family="text" style:name="T248">
      <style:text-properties fo:font-family="Courier New" style:font-family-asian="Courier New" style:font-family-complex="Courier New"/>
    </style:style>
    <style:style style:family="text" style:name="T249">
      <style:text-properties fo:font-family="Wingdings" style:font-family-asian="Wingdings" style:font-family-complex="Wingdings"/>
    </style:style>
    <style:style style:family="text" style:name="T250">
      <style:text-properties fo:font-family="Symbol" style:font-family-asian="Symbol" style:font-family-complex="Symbol"/>
    </style:style>
    <style:style style:family="text" style:name="T251">
      <style:text-properties fo:font-family="Courier New" style:font-family-asian="Courier New" style:font-family-complex="Courier New"/>
    </style:style>
    <style:style style:family="text" style:name="T252">
      <style:text-properties fo:font-family="Wingdings" style:font-family-asian="Wingdings" style:font-family-complex="Wingdings"/>
    </style:style>
    <style:style style:family="text" style:name="T253">
      <style:text-properties fo:font-family="Symbol" style:font-family-asian="Symbol" style:font-family-complex="Symbol"/>
    </style:style>
    <style:style style:family="text" style:name="T254">
      <style:text-properties fo:font-family="Courier New" style:font-family-asian="Courier New" style:font-family-complex="Courier New"/>
    </style:style>
    <style:style style:family="text" style:name="T255">
      <style:text-properties fo:font-family="Wingdings" style:font-family-asian="Wingdings" style:font-family-complex="Wingdings"/>
    </style:style>
    <style:style style:family="text" style:name="T256">
      <style:text-properties fo:font-family="Symbol" style:font-family-asian="Symbol" style:font-family-complex="Symbol"/>
    </style:style>
    <style:style style:family="text" style:name="T257">
      <style:text-properties fo:font-family="Courier New" style:font-family-asian="Courier New" style:font-family-complex="Courier New"/>
    </style:style>
    <style:style style:family="text" style:name="T258">
      <style:text-properties fo:font-family="Wingdings" style:font-family-asian="Wingdings" style:font-family-complex="Wingdings"/>
    </style:style>
    <style:style style:family="text" style:name="T259">
      <style:text-properties fo:font-family="Symbol" style:font-family-asian="Symbol" style:font-family-complex="Symbol"/>
    </style:style>
    <style:style style:family="text" style:name="T260">
      <style:text-properties fo:font-family="Courier New" style:font-family-asian="Courier New" style:font-family-complex="Courier New"/>
    </style:style>
    <style:style style:family="text" style:name="T261">
      <style:text-properties fo:font-family="Wingdings" style:font-family-asian="Wingdings" style:font-family-complex="Wingdings"/>
    </style:style>
    <style:style style:family="text" style:name="T262">
      <style:text-properties fo:font-family="Symbol" style:font-family-asian="Symbol" style:font-family-complex="Symbol"/>
    </style:style>
    <style:style style:family="text" style:name="T263">
      <style:text-properties fo:font-family="Courier New" style:font-family-asian="Courier New" style:font-family-complex="Courier New"/>
    </style:style>
    <style:style style:family="text" style:name="T264">
      <style:text-properties fo:font-family="Wingdings" style:font-family-asian="Wingdings" style:font-family-complex="Wingdings"/>
    </style:style>
    <style:style style:family="text" style:name="T265">
      <style:text-properties fo:font-family="Symbol" style:font-family-asian="Symbol" style:font-family-complex="Symbol"/>
    </style:style>
    <style:style style:family="text" style:name="T266">
      <style:text-properties fo:font-family="Courier New" style:font-family-asian="Courier New" style:font-family-complex="Courier New"/>
    </style:style>
    <style:style style:family="text" style:name="T267">
      <style:text-properties fo:font-family="Wingdings" style:font-family-asian="Wingdings" style:font-family-complex="Wingdings"/>
    </style:style>
    <style:style style:family="text" style:name="T268">
      <style:text-properties fo:font-family="Symbol" style:font-family-asian="Symbol" style:font-family-complex="Symbol"/>
    </style:style>
    <style:style style:family="text" style:name="T269">
      <style:text-properties fo:font-family="Courier New" style:font-family-asian="Courier New" style:font-family-complex="Courier New"/>
    </style:style>
    <style:style style:family="text" style:name="T270">
      <style:text-properties fo:font-family="Wingdings" style:font-family-asian="Wingdings" style:font-family-complex="Wingdings"/>
    </style:style>
    <style:style style:family="text" style:name="T271">
      <style:text-properties fo:font-family="Symbol" style:font-family-asian="Symbol" style:font-family-complex="Symbol"/>
    </style:style>
    <style:style style:family="text" style:name="T272">
      <style:text-properties fo:font-family="Courier New" style:font-family-asian="Courier New" style:font-family-complex="Courier New"/>
    </style:style>
    <style:style style:family="text" style:name="T273">
      <style:text-properties fo:font-family="Wingdings" style:font-family-asian="Wingdings" style:font-family-complex="Wingdings"/>
    </style:style>
    <style:style style:family="text" style:name="T274">
      <style:text-properties fo:font-family="Symbol" style:font-family-asian="Symbol" style:font-family-complex="Symbol"/>
    </style:style>
    <style:style style:family="text" style:name="T275">
      <style:text-properties fo:font-family="Courier New" style:font-family-asian="Courier New" style:font-family-complex="Courier New"/>
    </style:style>
    <style:style style:family="text" style:name="T276">
      <style:text-properties fo:font-family="Wingdings" style:font-family-asian="Wingdings" style:font-family-complex="Wingdings"/>
    </style:style>
    <style:style style:family="text" style:name="T277">
      <style:text-properties fo:font-family="Symbol" style:font-family-asian="Symbol" style:font-family-complex="Symbol"/>
    </style:style>
    <style:style style:family="text" style:name="T278">
      <style:text-properties fo:font-family="Courier New" style:font-family-asian="Courier New" style:font-family-complex="Courier New"/>
    </style:style>
    <style:style style:family="text" style:name="T279">
      <style:text-properties fo:font-family="Wingdings" style:font-family-asian="Wingdings" style:font-family-complex="Wingdings"/>
    </style:style>
    <style:style style:family="text" style:name="T280">
      <style:text-properties fo:font-family="Symbol" style:font-family-asian="Symbol" style:font-family-complex="Symbol"/>
    </style:style>
    <style:style style:family="text" style:name="T281">
      <style:text-properties fo:font-family="Courier New" style:font-family-asian="Courier New" style:font-family-complex="Courier New"/>
    </style:style>
    <style:style style:family="text" style:name="T282">
      <style:text-properties fo:font-family="Wingdings" style:font-family-asian="Wingdings" style:font-family-complex="Wingdings"/>
    </style:style>
    <style:style style:family="text" style:name="T283">
      <style:text-properties fo:font-family="Symbol" style:font-family-asian="Symbol" style:font-family-complex="Symbol"/>
    </style:style>
    <style:style style:family="text" style:name="T284">
      <style:text-properties fo:font-family="Courier New" style:font-family-asian="Courier New" style:font-family-complex="Courier New"/>
    </style:style>
    <style:style style:family="text" style:name="T285">
      <style:text-properties fo:font-family="Wingdings" style:font-family-asian="Wingdings" style:font-family-complex="Wingdings"/>
    </style:style>
    <style:style style:family="text" style:name="T286">
      <style:text-properties fo:font-family="Symbol" style:font-family-asian="Symbol" style:font-family-complex="Symbol"/>
    </style:style>
    <style:style style:family="text" style:name="T287">
      <style:text-properties fo:font-family="Courier New" style:font-family-asian="Courier New" style:font-family-complex="Courier New"/>
    </style:style>
    <style:style style:family="text" style:name="T288">
      <style:text-properties fo:font-family="Wingdings" style:font-family-asian="Wingdings" style:font-family-complex="Wingdings"/>
    </style:style>
    <style:style style:family="text" style:name="T289">
      <style:text-properties fo:font-family="Symbol" style:font-family-asian="Symbol" style:font-family-complex="Symbol"/>
    </style:style>
    <style:style style:family="text" style:name="T290">
      <style:text-properties fo:font-family="Courier New" style:font-family-asian="Courier New" style:font-family-complex="Courier New"/>
    </style:style>
    <style:style style:family="text" style:name="T291">
      <style:text-properties fo:font-family="Wingdings" style:font-family-asian="Wingdings" style:font-family-complex="Wingdings"/>
    </style:style>
    <style:style style:family="text" style:name="T292">
      <style:text-properties fo:font-family="Symbol" style:font-family-asian="Symbol" style:font-family-complex="Symbol"/>
    </style:style>
    <style:style style:family="text" style:name="T293">
      <style:text-properties fo:font-family="Courier New" style:font-family-asian="Courier New" style:font-family-complex="Courier New"/>
    </style:style>
    <style:style style:family="text" style:name="T294">
      <style:text-properties fo:font-family="Wingdings" style:font-family-asian="Wingdings" style:font-family-complex="Wingdings"/>
    </style:style>
    <style:style style:family="text" style:name="T295">
      <style:text-properties fo:font-family="Symbol" style:font-family-asian="Symbol" style:font-family-complex="Symbol"/>
    </style:style>
    <style:style style:family="text" style:name="T296">
      <style:text-properties fo:font-family="Courier New" style:font-family-asian="Courier New" style:font-family-complex="Courier New"/>
    </style:style>
    <style:style style:family="text" style:name="T297">
      <style:text-properties fo:font-family="Wingdings" style:font-family-asian="Wingdings" style:font-family-complex="Wingdings"/>
    </style:style>
    <style:style style:family="text" style:name="T298">
      <style:text-properties fo:font-family="Symbol" style:font-family-asian="Symbol" style:font-family-complex="Symbol"/>
    </style:style>
    <style:style style:family="text" style:name="T299">
      <style:text-properties fo:font-family="Courier New" style:font-family-asian="Courier New" style:font-family-complex="Courier New"/>
    </style:style>
    <style:style style:family="text" style:name="T300">
      <style:text-properties fo:font-family="Wingdings" style:font-family-asian="Wingdings" style:font-family-complex="Wingdings"/>
    </style:style>
    <style:style style:family="text" style:name="T301">
      <style:text-properties fo:font-family="Symbol" style:font-family-asian="Symbol" style:font-family-complex="Symbol"/>
    </style:style>
    <style:style style:family="text" style:name="T302">
      <style:text-properties fo:font-family="Courier New" style:font-family-asian="Courier New" style:font-family-complex="Courier New"/>
    </style:style>
    <style:style style:family="text" style:name="T303">
      <style:text-properties fo:font-family="Wingdings" style:font-family-asian="Wingdings" style:font-family-complex="Wingdings"/>
    </style:style>
    <style:style style:family="text" style:name="T304">
      <style:text-properties fo:font-family="Symbol" style:font-family-asian="Symbol" style:font-family-complex="Symbol"/>
    </style:style>
    <style:style style:family="text" style:name="T305">
      <style:text-properties fo:font-family="Courier New" style:font-family-asian="Courier New" style:font-family-complex="Courier New"/>
    </style:style>
    <style:style style:family="text" style:name="T306">
      <style:text-properties fo:font-family="Wingdings" style:font-family-asian="Wingdings" style:font-family-complex="Wingdings"/>
    </style:style>
    <style:style style:family="text" style:name="T307">
      <style:text-properties fo:font-family="Symbol" style:font-family-asian="Symbol" style:font-family-complex="Symbol"/>
    </style:style>
    <style:style style:family="text" style:name="T308">
      <style:text-properties fo:font-family="Courier New" style:font-family-asian="Courier New" style:font-family-complex="Courier New"/>
    </style:style>
    <style:style style:family="text" style:name="T309">
      <style:text-properties fo:font-family="Wingdings" style:font-family-asian="Wingdings" style:font-family-complex="Wingdings"/>
    </style:style>
    <style:style style:family="text" style:name="T310">
      <style:text-properties fo:font-family="Symbol" style:font-family-asian="Symbol" style:font-family-complex="Symbol"/>
    </style:style>
    <style:style style:family="text" style:name="T311">
      <style:text-properties fo:font-family="Courier New" style:font-family-asian="Courier New" style:font-family-complex="Courier New"/>
    </style:style>
    <style:style style:family="text" style:name="T312">
      <style:text-properties fo:font-family="Wingdings" style:font-family-asian="Wingdings" style:font-family-complex="Wingdings"/>
    </style:style>
    <style:style style:family="text" style:name="T313">
      <style:text-properties fo:font-family="Symbol" style:font-family-asian="Symbol" style:font-family-complex="Symbol"/>
    </style:style>
    <style:style style:family="text" style:name="T314">
      <style:text-properties fo:font-family="Courier New" style:font-family-asian="Courier New" style:font-family-complex="Courier New"/>
    </style:style>
    <style:style style:family="text" style:name="T315">
      <style:text-properties fo:font-family="Wingdings" style:font-family-asian="Wingdings" style:font-family-complex="Wingdings"/>
    </style:style>
    <style:style style:family="text" style:name="T316">
      <style:text-properties fo:font-family="Symbol" style:font-family-asian="Symbol" style:font-family-complex="Symbol"/>
    </style:style>
    <style:style style:family="text" style:name="T317">
      <style:text-properties fo:font-family="Courier New" style:font-family-asian="Courier New" style:font-family-complex="Courier New"/>
    </style:style>
    <style:style style:family="text" style:name="T318">
      <style:text-properties fo:font-family="Wingdings" style:font-family-asian="Wingdings" style:font-family-complex="Wingdings"/>
    </style:style>
    <style:style style:family="text" style:name="T319">
      <style:text-properties fo:font-family="Symbol" style:font-family-asian="Symbol" style:font-family-complex="Symbol"/>
    </style:style>
    <style:style style:family="text" style:name="T320">
      <style:text-properties fo:font-family="Courier New" style:font-family-asian="Courier New" style:font-family-complex="Courier New"/>
    </style:style>
    <style:style style:family="text" style:name="T321">
      <style:text-properties fo:font-family="Wingdings" style:font-family-asian="Wingdings" style:font-family-complex="Wingdings"/>
    </style:style>
    <style:style style:family="text" style:name="T322">
      <style:text-properties fo:font-family="Symbol" style:font-family-asian="Symbol" style:font-family-complex="Symbol"/>
    </style:style>
    <style:style style:family="text" style:name="T323">
      <style:text-properties fo:font-family="Courier New" style:font-family-asian="Courier New" style:font-family-complex="Courier New"/>
    </style:style>
    <style:style style:family="text" style:name="T324">
      <style:text-properties fo:font-family="Wingdings" style:font-family-asian="Wingdings" style:font-family-complex="Wingdings"/>
    </style:style>
    <style:style style:family="text" style:name="T325">
      <style:text-properties fo:font-family="Symbol" style:font-family-asian="Symbol" style:font-family-complex="Symbol"/>
    </style:style>
    <style:style style:family="text" style:name="T326">
      <style:text-properties fo:font-family="Courier New" style:font-family-asian="Courier New" style:font-family-complex="Courier New"/>
    </style:style>
    <style:style style:family="text" style:name="T327">
      <style:text-properties fo:font-family="Wingdings" style:font-family-asian="Wingdings" style:font-family-complex="Wingdings"/>
    </style:style>
    <style:style style:family="text" style:name="T328">
      <style:text-properties fo:font-family="Symbol" style:font-family-asian="Symbol" style:font-family-complex="Symbol"/>
    </style:style>
    <style:style style:family="text" style:name="T329">
      <style:text-properties fo:font-family="Courier New" style:font-family-asian="Courier New" style:font-family-complex="Courier New"/>
    </style:style>
    <style:style style:family="text" style:name="T330">
      <style:text-properties fo:font-family="Wingdings" style:font-family-asian="Wingdings" style:font-family-complex="Wingdings"/>
    </style:style>
    <style:style style:family="text" style:name="T331">
      <style:text-properties fo:font-family="Symbol" style:font-family-asian="Symbol" style:font-family-complex="Symbol"/>
    </style:style>
    <style:style style:family="text" style:name="T332">
      <style:text-properties fo:font-family="Courier New" style:font-family-asian="Courier New" style:font-family-complex="Courier New"/>
    </style:style>
    <style:style style:family="text" style:name="T333">
      <style:text-properties fo:font-family="Wingdings" style:font-family-asian="Wingdings" style:font-family-complex="Wingdings"/>
    </style:style>
    <style:style style:family="text" style:name="T334">
      <style:text-properties fo:font-family="Symbol" style:font-family-asian="Symbol" style:font-family-complex="Symbol"/>
    </style:style>
    <style:style style:family="text" style:name="T335">
      <style:text-properties fo:font-family="Courier New" style:font-family-asian="Courier New" style:font-family-complex="Courier New"/>
    </style:style>
    <style:style style:family="text" style:name="T336">
      <style:text-properties fo:font-family="Wingdings" style:font-family-asian="Wingdings" style:font-family-complex="Wingdings"/>
    </style:style>
    <style:style style:family="text" style:name="T337">
      <style:text-properties fo:font-family="Symbol" style:font-family-asian="Symbol" style:font-family-complex="Symbol"/>
    </style:style>
    <style:style style:family="text" style:name="T338">
      <style:text-properties fo:font-family="Courier New" style:font-family-asian="Courier New" style:font-family-complex="Courier New"/>
    </style:style>
    <style:style style:family="text" style:name="T339">
      <style:text-properties fo:font-family="Wingdings" style:font-family-asian="Wingdings" style:font-family-complex="Wingdings"/>
    </style:style>
    <style:style style:family="text" style:name="T340">
      <style:text-properties fo:font-family="Symbol" style:font-family-asian="Symbol" style:font-family-complex="Symbol"/>
    </style:style>
    <style:style style:family="text" style:name="T341">
      <style:text-properties fo:font-family="Courier New" style:font-family-asian="Courier New" style:font-family-complex="Courier New"/>
    </style:style>
    <style:style style:family="text" style:name="T342">
      <style:text-properties fo:font-family="Wingdings" style:font-family-asian="Wingdings" style:font-family-complex="Wingdings"/>
    </style:style>
    <style:style style:family="text" style:name="T343">
      <style:text-properties fo:font-family="Symbol" style:font-family-asian="Symbol" style:font-family-complex="Symbol"/>
    </style:style>
    <style:style style:family="text" style:name="T344">
      <style:text-properties fo:font-family="Courier New" style:font-family-asian="Courier New" style:font-family-complex="Courier New"/>
    </style:style>
    <style:style style:family="text" style:name="T345">
      <style:text-properties fo:font-family="Wingdings" style:font-family-asian="Wingdings" style:font-family-complex="Wingdings"/>
    </style:style>
    <style:style style:family="text" style:name="T346">
      <style:text-properties fo:font-family="Symbol" style:font-family-asian="Symbol" style:font-family-complex="Symbol"/>
    </style:style>
    <style:style style:family="text" style:name="T347">
      <style:text-properties fo:font-family="Courier New" style:font-family-asian="Courier New" style:font-family-complex="Courier New"/>
    </style:style>
    <style:style style:family="text" style:name="T348">
      <style:text-properties fo:font-family="Wingdings" style:font-family-asian="Wingdings" style:font-family-complex="Wingdings"/>
    </style:style>
    <style:style style:family="text" style:name="T349">
      <style:text-properties fo:font-family="Symbol" style:font-family-asian="Symbol" style:font-family-complex="Symbol"/>
    </style:style>
    <style:style style:family="text" style:name="T350">
      <style:text-properties fo:font-family="Courier New" style:font-family-asian="Courier New" style:font-family-complex="Courier New"/>
    </style:style>
    <style:style style:family="text" style:name="T351">
      <style:text-properties fo:font-family="Wingdings" style:font-family-asian="Wingdings" style:font-family-complex="Wingdings"/>
    </style:style>
    <style:style style:family="text" style:name="T352">
      <style:text-properties fo:font-family="Symbol" style:font-family-asian="Symbol" style:font-family-complex="Symbol"/>
    </style:style>
    <style:style style:family="text" style:name="T353">
      <style:text-properties fo:font-family="Courier New" style:font-family-asian="Courier New" style:font-family-complex="Courier New"/>
    </style:style>
    <style:style style:family="text" style:name="T354">
      <style:text-properties fo:font-family="Wingdings" style:font-family-asian="Wingdings" style:font-family-complex="Wingdings"/>
    </style:style>
    <style:style style:family="text" style:name="T355">
      <style:text-properties fo:font-family="Symbol" style:font-family-asian="Symbol" style:font-family-complex="Symbol"/>
    </style:style>
    <style:style style:family="text" style:name="T356">
      <style:text-properties fo:font-family="Courier New" style:font-family-asian="Courier New" style:font-family-complex="Courier New"/>
    </style:style>
    <style:style style:family="text" style:name="T357">
      <style:text-properties fo:font-family="Wingdings" style:font-family-asian="Wingdings" style:font-family-complex="Wingdings"/>
    </style:style>
    <style:style style:family="text" style:name="T358">
      <style:text-properties fo:font-family="Symbol" style:font-family-asian="Symbol" style:font-family-complex="Symbol"/>
    </style:style>
    <style:style style:family="text" style:name="T359">
      <style:text-properties fo:font-family="Courier New" style:font-family-asian="Courier New" style:font-family-complex="Courier New"/>
    </style:style>
    <style:style style:family="text" style:name="T360">
      <style:text-properties fo:font-family="Wingdings" style:font-family-asian="Wingdings" style:font-family-complex="Wingdings"/>
    </style:style>
    <style:style style:family="text" style:name="T361">
      <style:text-properties fo:font-family="Symbol" style:font-family-asian="Symbol" style:font-family-complex="Symbol"/>
    </style:style>
    <style:style style:family="text" style:name="T362">
      <style:text-properties fo:font-family="Courier New" style:font-family-asian="Courier New" style:font-family-complex="Courier New"/>
    </style:style>
    <style:style style:family="text" style:name="T363">
      <style:text-properties fo:font-family="Wingdings" style:font-family-asian="Wingdings" style:font-family-complex="Wingdings"/>
    </style:style>
    <style:style style:family="text" style:name="T364">
      <style:text-properties fo:font-family="Symbol" style:font-family-asian="Symbol" style:font-family-complex="Symbol"/>
    </style:style>
    <style:style style:family="text" style:name="T365">
      <style:text-properties fo:font-family="Courier New" style:font-family-asian="Courier New" style:font-family-complex="Courier New"/>
    </style:style>
    <style:style style:family="text" style:name="T366">
      <style:text-properties fo:font-family="Wingdings" style:font-family-asian="Wingdings" style:font-family-complex="Wingdings"/>
    </style:style>
    <style:style style:family="text" style:name="T367">
      <style:text-properties fo:font-family="Symbol" style:font-family-asian="Symbol" style:font-family-complex="Symbol"/>
    </style:style>
    <style:style style:family="text" style:name="T368">
      <style:text-properties fo:font-family="Courier New" style:font-family-asian="Courier New" style:font-family-complex="Courier New"/>
    </style:style>
    <style:style style:family="text" style:name="T369">
      <style:text-properties fo:font-family="Wingdings" style:font-family-asian="Wingdings" style:font-family-complex="Wingdings"/>
    </style:style>
    <style:style style:family="text" style:name="T370">
      <style:text-properties fo:font-family="Symbol" style:font-family-asian="Symbol" style:font-family-complex="Symbol"/>
    </style:style>
    <style:style style:family="text" style:name="T371">
      <style:text-properties fo:font-family="Courier New" style:font-family-asian="Courier New" style:font-family-complex="Courier New"/>
    </style:style>
    <style:style style:family="text" style:name="T372">
      <style:text-properties fo:font-family="Wingdings" style:font-family-asian="Wingdings" style:font-family-complex="Wingdings"/>
    </style:style>
    <style:style style:family="text" style:name="T373">
      <style:text-properties fo:font-family="Symbol" style:font-family-asian="Symbol" style:font-family-complex="Symbol"/>
    </style:style>
    <style:style style:family="text" style:name="T374">
      <style:text-properties fo:font-family="Courier New" style:font-family-asian="Courier New" style:font-family-complex="Courier New"/>
    </style:style>
    <style:style style:family="text" style:name="T375">
      <style:text-properties fo:font-family="Wingdings" style:font-family-asian="Wingdings" style:font-family-complex="Wingdings"/>
    </style:style>
    <style:style style:family="text" style:name="T376">
      <style:text-properties fo:font-family="Symbol" style:font-family-asian="Symbol" style:font-family-complex="Symbol"/>
    </style:style>
    <style:style style:family="text" style:name="T377">
      <style:text-properties fo:font-family="Courier New" style:font-family-asian="Courier New" style:font-family-complex="Courier New"/>
    </style:style>
    <style:style style:family="text" style:name="T378">
      <style:text-properties fo:font-family="Wingdings" style:font-family-asian="Wingdings" style:font-family-complex="Wingdings"/>
    </style:style>
    <style:style style:family="text" style:name="T379">
      <style:text-properties fo:font-family="Symbol" style:font-family-asian="Symbol" style:font-family-complex="Symbol"/>
    </style:style>
    <style:style style:family="text" style:name="T380">
      <style:text-properties fo:font-family="Courier New" style:font-family-asian="Courier New" style:font-family-complex="Courier New"/>
    </style:style>
    <style:style style:family="text" style:name="T381">
      <style:text-properties fo:font-family="Wingdings" style:font-family-asian="Wingdings" style:font-family-complex="Wingdings"/>
    </style:style>
    <style:style style:family="text" style:name="T382">
      <style:text-properties fo:font-family="Symbol" style:font-family-asian="Symbol" style:font-family-complex="Symbol"/>
    </style:style>
    <style:style style:family="text" style:name="T383">
      <style:text-properties fo:font-family="Courier New" style:font-family-asian="Courier New" style:font-family-complex="Courier New"/>
    </style:style>
    <style:style style:family="text" style:name="T384">
      <style:text-properties fo:font-family="Wingdings" style:font-family-asian="Wingdings" style:font-family-complex="Wingdings"/>
    </style:style>
    <style:style style:family="text" style:name="T385">
      <style:text-properties fo:font-family="Symbol" style:font-family-asian="Symbol" style:font-family-complex="Symbol"/>
    </style:style>
    <style:style style:family="text" style:name="T386">
      <style:text-properties fo:font-family="Courier New" style:font-family-asian="Courier New" style:font-family-complex="Courier New"/>
    </style:style>
    <style:style style:family="text" style:name="T387">
      <style:text-properties fo:font-family="Wingdings" style:font-family-asian="Wingdings" style:font-family-complex="Wingdings"/>
    </style:style>
    <style:style style:family="text" style:name="T388">
      <style:text-properties fo:font-family="Symbol" style:font-family-asian="Symbol" style:font-family-complex="Symbol"/>
    </style:style>
    <style:style style:family="text" style:name="T389">
      <style:text-properties fo:font-family="Courier New" style:font-family-asian="Courier New" style:font-family-complex="Courier New"/>
    </style:style>
    <style:style style:family="text" style:name="T390">
      <style:text-properties fo:font-family="Wingdings" style:font-family-asian="Wingdings" style:font-family-complex="Wingdings"/>
    </style:style>
    <style:style style:family="text" style:name="T391">
      <style:text-properties fo:font-family="Symbol" style:font-family-asian="Symbol" style:font-family-complex="Symbol"/>
    </style:style>
    <style:style style:family="text" style:name="T392">
      <style:text-properties fo:font-family="Courier New" style:font-family-asian="Courier New" style:font-family-complex="Courier New"/>
    </style:style>
    <style:style style:family="text" style:name="T393">
      <style:text-properties fo:font-family="Wingdings" style:font-family-asian="Wingdings" style:font-family-complex="Wingdings"/>
    </style:style>
    <style:style style:family="text" style:name="T394">
      <style:text-properties fo:font-family="Symbol" style:font-family-asian="Symbol" style:font-family-complex="Symbol"/>
    </style:style>
    <style:style style:family="text" style:name="T395">
      <style:text-properties fo:font-family="Courier New" style:font-family-asian="Courier New" style:font-family-complex="Courier New"/>
    </style:style>
    <style:style style:family="text" style:name="T396">
      <style:text-properties fo:font-family="Wingdings" style:font-family-asian="Wingdings" style:font-family-complex="Wingdings"/>
    </style:style>
    <style:style style:family="text" style:name="T397">
      <style:text-properties fo:font-family="Symbol" style:font-family-asian="Symbol" style:font-family-complex="Symbol"/>
    </style:style>
    <style:style style:family="text" style:name="T398">
      <style:text-properties fo:font-family="Courier New" style:font-family-asian="Courier New" style:font-family-complex="Courier New"/>
    </style:style>
    <style:style style:family="text" style:name="T399">
      <style:text-properties fo:font-family="Wingdings" style:font-family-asian="Wingdings" style:font-family-complex="Wingdings"/>
    </style:style>
    <style:style style:family="text" style:name="T400">
      <style:text-properties fo:font-family="Symbol" style:font-family-asian="Symbol" style:font-family-complex="Symbol"/>
    </style:style>
    <style:style style:family="text" style:name="T401">
      <style:text-properties fo:font-family="Courier New" style:font-family-asian="Courier New" style:font-family-complex="Courier New"/>
    </style:style>
    <style:style style:family="text" style:name="T402">
      <style:text-properties fo:font-family="Wingdings" style:font-family-asian="Wingdings" style:font-family-complex="Wingdings"/>
    </style:style>
    <style:style style:family="text" style:name="T403">
      <style:text-properties fo:font-family="Symbol" style:font-family-asian="Symbol" style:font-family-complex="Symbol"/>
    </style:style>
    <style:style style:family="text" style:name="T404">
      <style:text-properties fo:font-family="Courier New" style:font-family-asian="Courier New" style:font-family-complex="Courier New"/>
    </style:style>
    <style:style style:family="text" style:name="T405">
      <style:text-properties fo:font-family="Wingdings" style:font-family-asian="Wingdings" style:font-family-complex="Wingdings"/>
    </style:style>
    <style:style style:family="text" style:name="T406">
      <style:text-properties fo:font-family="Symbol" style:font-family-asian="Symbol" style:font-family-complex="Symbol"/>
    </style:style>
    <style:style style:family="text" style:name="T407">
      <style:text-properties fo:font-family="Courier New" style:font-family-asian="Courier New" style:font-family-complex="Courier New"/>
    </style:style>
    <style:style style:family="text" style:name="T408">
      <style:text-properties fo:font-family="Wingdings" style:font-family-asian="Wingdings" style:font-family-complex="Wingdings"/>
    </style:style>
    <style:style style:family="text" style:name="T409">
      <style:text-properties fo:font-family="Symbol" style:font-family-asian="Symbol" style:font-family-complex="Symbol"/>
    </style:style>
    <style:style style:family="text" style:name="T410">
      <style:text-properties fo:font-family="Courier New" style:font-family-asian="Courier New" style:font-family-complex="Courier New"/>
    </style:style>
    <style:style style:family="text" style:name="T411">
      <style:text-properties fo:font-family="Wingdings" style:font-family-asian="Wingdings" style:font-family-complex="Wingdings"/>
    </style:style>
    <style:style style:family="text" style:name="T412">
      <style:text-properties fo:font-family="Symbol" style:font-family-asian="Symbol" style:font-family-complex="Symbol"/>
    </style:style>
    <style:style style:family="text" style:name="T413">
      <style:text-properties fo:font-family="Courier New" style:font-family-asian="Courier New" style:font-family-complex="Courier New"/>
    </style:style>
    <style:style style:family="text" style:name="T414">
      <style:text-properties fo:font-family="Wingdings" style:font-family-asian="Wingdings" style:font-family-complex="Wingdings"/>
    </style:style>
    <style:style style:family="text" style:name="T415">
      <style:text-properties fo:font-family="Symbol" style:font-family-asian="Symbol" style:font-family-complex="Symbol"/>
    </style:style>
    <style:style style:family="text" style:name="T416">
      <style:text-properties fo:font-family="Courier New" style:font-family-asian="Courier New" style:font-family-complex="Courier New"/>
    </style:style>
    <style:style style:family="text" style:name="T417">
      <style:text-properties fo:font-family="Wingdings" style:font-family-asian="Wingdings" style:font-family-complex="Wingdings"/>
    </style:style>
    <style:style style:family="text" style:name="T418">
      <style:text-properties fo:font-family="Symbol" style:font-family-asian="Symbol" style:font-family-complex="Symbol"/>
    </style:style>
    <style:style style:family="text" style:name="T419">
      <style:text-properties fo:font-family="Courier New" style:font-family-asian="Courier New" style:font-family-complex="Courier New"/>
    </style:style>
    <style:style style:family="text" style:name="T420">
      <style:text-properties fo:font-family="Wingdings" style:font-family-asian="Wingdings" style:font-family-complex="Wingdings"/>
    </style:style>
    <style:style style:family="text" style:name="T421">
      <style:text-properties fo:font-family="Symbol" style:font-family-asian="Symbol" style:font-family-complex="Symbol"/>
    </style:style>
    <style:style style:family="text" style:name="T422">
      <style:text-properties fo:font-family="Courier New" style:font-family-asian="Courier New" style:font-family-complex="Courier New"/>
    </style:style>
    <style:style style:family="text" style:name="T423">
      <style:text-properties fo:font-family="Wingdings" style:font-family-asian="Wingdings" style:font-family-complex="Wingdings"/>
    </style:style>
    <style:style style:family="text" style:name="T424">
      <style:text-properties fo:font-family="Symbol" style:font-family-asian="Symbol" style:font-family-complex="Symbol"/>
    </style:style>
    <style:style style:family="text" style:name="T425">
      <style:text-properties fo:font-family="Courier New" style:font-family-asian="Courier New" style:font-family-complex="Courier New"/>
    </style:style>
    <style:style style:family="text" style:name="T426">
      <style:text-properties fo:font-family="Wingdings" style:font-family-asian="Wingdings" style:font-family-complex="Wingdings"/>
    </style:style>
    <style:style style:family="text" style:name="T427">
      <style:text-properties fo:font-family="Symbol" style:font-family-asian="Symbol" style:font-family-complex="Symbol"/>
    </style:style>
    <style:style style:family="text" style:name="T428">
      <style:text-properties fo:font-family="Courier New" style:font-family-asian="Courier New" style:font-family-complex="Courier New"/>
    </style:style>
    <style:style style:family="text" style:name="T429">
      <style:text-properties fo:font-family="Wingdings" style:font-family-asian="Wingdings" style:font-family-complex="Wingdings"/>
    </style:style>
    <style:style style:family="text" style:name="T430">
      <style:text-properties fo:font-family="Symbol" style:font-family-asian="Symbol" style:font-family-complex="Symbol"/>
    </style:style>
    <style:style style:family="text" style:name="T431">
      <style:text-properties fo:font-family="Courier New" style:font-family-asian="Courier New" style:font-family-complex="Courier New"/>
    </style:style>
    <style:style style:family="text" style:name="T432">
      <style:text-properties fo:font-family="Wingdings" style:font-family-asian="Wingdings" style:font-family-complex="Wingdings"/>
    </style:style>
    <style:style style:family="text" style:name="T433">
      <style:text-properties fo:font-family="Symbol" style:font-family-asian="Symbol" style:font-family-complex="Symbol"/>
    </style:style>
    <style:style style:family="text" style:name="T434">
      <style:text-properties fo:font-family="Courier New" style:font-family-asian="Courier New" style:font-family-complex="Courier New"/>
    </style:style>
    <style:style style:family="text" style:name="T435">
      <style:text-properties fo:font-family="Wingdings" style:font-family-asian="Wingdings" style:font-family-complex="Wingdings"/>
    </style:style>
    <style:style style:family="text" style:name="T436">
      <style:text-properties fo:font-family="Symbol" style:font-family-asian="Symbol" style:font-family-complex="Symbol"/>
    </style:style>
    <style:style style:family="text" style:name="T437">
      <style:text-properties fo:font-family="Courier New" style:font-family-asian="Courier New" style:font-family-complex="Courier New"/>
    </style:style>
    <style:style style:family="text" style:name="T438">
      <style:text-properties fo:font-family="Wingdings" style:font-family-asian="Wingdings" style:font-family-complex="Wingdings"/>
    </style:style>
    <style:style style:family="text" style:name="T439">
      <style:text-properties fo:font-family="Symbol" style:font-family-asian="Symbol" style:font-family-complex="Symbol"/>
    </style:style>
    <style:style style:family="text" style:name="T440">
      <style:text-properties fo:font-family="Courier New" style:font-family-asian="Courier New" style:font-family-complex="Courier New"/>
    </style:style>
    <style:style style:family="text" style:name="T441">
      <style:text-properties fo:font-family="Wingdings" style:font-family-asian="Wingdings" style:font-family-complex="Wingdings"/>
    </style:style>
    <style:style style:family="text" style:name="T442">
      <style:text-properties fo:font-family="Symbol" style:font-family-asian="Symbol" style:font-family-complex="Symbol"/>
    </style:style>
    <style:style style:family="text" style:name="T443">
      <style:text-properties fo:font-family="Courier New" style:font-family-asian="Courier New" style:font-family-complex="Courier New"/>
    </style:style>
    <style:style style:family="text" style:name="T444">
      <style:text-properties fo:font-family="Wingdings" style:font-family-asian="Wingdings" style:font-family-complex="Wingdings"/>
    </style:style>
    <style:style style:family="text" style:name="T445">
      <style:text-properties fo:font-family="Symbol" style:font-family-asian="Symbol" style:font-family-complex="Symbol"/>
    </style:style>
    <style:style style:family="text" style:name="T446">
      <style:text-properties fo:font-family="Courier New" style:font-family-asian="Courier New" style:font-family-complex="Courier New"/>
    </style:style>
    <style:style style:family="text" style:name="T447">
      <style:text-properties fo:font-family="Wingdings" style:font-family-asian="Wingdings" style:font-family-complex="Wingdings"/>
    </style:style>
    <style:style style:family="text" style:name="T448">
      <style:text-properties fo:font-family="Symbol" style:font-family-asian="Symbol" style:font-family-complex="Symbol"/>
    </style:style>
    <style:style style:family="text" style:name="T449">
      <style:text-properties fo:font-family="Courier New" style:font-family-asian="Courier New" style:font-family-complex="Courier New"/>
    </style:style>
    <style:style style:family="text" style:name="T450">
      <style:text-properties fo:font-family="Wingdings" style:font-family-asian="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0">
      <text:list-level-style-bullet text:level="1" text:style-name="T8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1">
      <text:list-level-style-bullet text:level="1" text:style-name="T9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2">
      <text:list-level-style-bullet text:level="1" text:style-name="T10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3">
      <text:list-level-style-bullet text:level="1" text:style-name="T10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4">
      <text:list-level-style-bullet text:level="1" text:style-name="T11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5">
      <text:list-level-style-bullet text:level="1" text:style-name="T12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6">
      <text:list-level-style-bullet text:level="1" text:style-name="T13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7">
      <text:list-level-style-bullet text:level="1" text:style-name="T14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5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5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6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9">
      <text:list-level-style-bullet text:level="1" text:style-name="T16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6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6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0">
      <text:list-level-style-bullet text:level="1" text:style-name="T17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7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7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8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8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2">
      <text:list-level-style-bullet text:level="1" text:style-name="T19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9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9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9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3">
      <text:list-level-style-bullet text:level="1" text:style-name="T19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0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0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4">
      <text:list-level-style-bullet text:level="1" text:style-name="T20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1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1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1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1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1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1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5">
      <text:list-level-style-bullet text:level="1" text:style-name="T21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1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2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2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6">
      <text:list-level-style-bullet text:level="1" text:style-name="T22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2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2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3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3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3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3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7">
      <text:list-level-style-bullet text:level="1" text:style-name="T23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3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4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8">
      <text:list-level-style-bullet text:level="1" text:style-name="T24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4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4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4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4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5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5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9">
      <text:list-level-style-bullet text:level="1" text:style-name="T25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5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5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0">
      <text:list-level-style-bullet text:level="1" text:style-name="T26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6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6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6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6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6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6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1">
      <text:list-level-style-bullet text:level="1" text:style-name="T27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7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7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7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2">
      <text:list-level-style-bullet text:level="1" text:style-name="T28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8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8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8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8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8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8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8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8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3">
      <text:list-level-style-bullet text:level="1" text:style-name="T28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9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9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9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9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9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9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9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4">
      <text:list-level-style-bullet text:level="1" text:style-name="T29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0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0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0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0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0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0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5">
      <text:list-level-style-bullet text:level="1" text:style-name="T30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0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1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1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6">
      <text:list-level-style-bullet text:level="1" text:style-name="T31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1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1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2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2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2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2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7">
      <text:list-level-style-bullet text:level="1" text:style-name="T32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2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2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2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3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3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3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8">
      <text:list-level-style-bullet text:level="1" text:style-name="T33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3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3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3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3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4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4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9">
      <text:list-level-style-bullet text:level="1" text:style-name="T34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4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4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4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4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4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5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0">
      <text:list-level-style-bullet text:level="1" text:style-name="T35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5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5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5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5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5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5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1">
      <text:list-level-style-bullet text:level="1" text:style-name="T36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6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6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6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6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6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6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6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2">
      <text:list-level-style-bullet text:level="1" text:style-name="T37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7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7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7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7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7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7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7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7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3">
      <text:list-level-style-bullet text:level="1" text:style-name="T37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8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8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8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8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8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8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8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4">
      <text:list-level-style-bullet text:level="1" text:style-name="T38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9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9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9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9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9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9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5">
      <text:list-level-style-bullet text:level="1" text:style-name="T39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9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0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0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0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0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0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6">
      <text:list-level-style-bullet text:level="1" text:style-name="T40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0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0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1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1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1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1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7">
      <text:list-level-style-bullet text:level="1" text:style-name="T41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1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1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1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2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2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2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8">
      <text:list-level-style-bullet text:level="1" text:style-name="T42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2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2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2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2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3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3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9">
      <text:list-level-style-bullet text:level="1" text:style-name="T43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3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3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3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3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3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4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0">
      <text:list-level-style-bullet text:level="1" text:style-name="T44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4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4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4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4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4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4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59cm" fo:page-height="27.94cm" style:print-orientation="portrait" fo:margin-top="1.27cm" fo:margin-bottom="1.27cm" fo:margin-left="2.54cm" fo:margin-right="2.54cm"/>
    </style:page-layout>
    <style:page-layout style:name="Mpm2">
      <style:page-layout-properties fo:page-width="21.59cm" fo:page-height="27.94cm" style:print-orientation="portrait" fo:margin-top="1.27cm" fo:margin-bottom="1.27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4.0.129</meta:generator>
    <dc:creator/>
  </office:meta>
</office:document-meta>
</file>