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fo:line-height="115%" fo:margin-left="0cm" fo:margin-right="0cm" fo:text-indent="0cm" fo:margin-top="0pt" fo:margin-bottom="0pt" fo:border="none"/>
      <style:text-properties/>
    </style:style>
    <style:style style:family="text" style:name="T743">
      <style:text-properties fo:color="#1f1f1f" fo:font-family="Arial" style:font-family-asian="Arial" style:font-family-complex="Arial" fo:font-size="12pt"/>
    </style:style>
    <style:style style:parent-style-name="949" style:family="paragraph" style:name="P3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44">
      <style:text-properties fo:color="#1f1f1f" fo:font-family="Arial" style:font-family-asian="Arial" style:font-family-complex="Arial" fo:font-size="14pt" fo:font-weight="bold"/>
    </style:style>
    <style:style style:family="paragraph" style:name="P35">
      <style:paragraph-properties fo:line-height="115%" fo:margin-left="0cm" fo:margin-right="0cm" fo:text-indent="0cm" fo:margin-top="0pt" fo:margin-bottom="0pt" fo:border="none"/>
      <style:text-properties/>
    </style:style>
    <style:style style:family="text" style:name="T745">
      <style:text-properties fo:color="#1f1f1f" fo:font-family="Arial" style:font-family-asian="Arial" style:font-family-complex="Arial" fo:font-size="12pt"/>
    </style:style>
    <style:style style:parent-style-name="950" style:family="paragraph" style:name="P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6">
      <style:text-properties fo:color="#1f1f1f" fo:font-family="Arial" style:font-family-asian="Arial" style:font-family-complex="Arial" fo:font-size="12pt" fo:font-weight="bold"/>
    </style:style>
    <style:style style:family="paragraph" style:name="P37">
      <style:paragraph-properties fo:line-height="115%" fo:margin-left="0cm" fo:margin-right="0cm" fo:text-indent="0cm" fo:margin-top="0pt" fo:margin-bottom="0pt" fo:border="none"/>
      <style:text-properties/>
    </style:style>
    <style:style style:family="text" style:name="T747">
      <style:text-properties fo:color="#1f1f1f" fo:font-family="Arial" style:font-family-asian="Arial" style:font-family-complex="Arial" fo:font-size="12pt"/>
    </style:style>
    <style:style style:parent-style-name="950" style:family="paragraph" style:name="P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8">
      <style:text-properties fo:color="#1f1f1f" fo:font-family="Arial" style:font-family-asian="Arial" style:font-family-complex="Arial" fo:font-size="12pt" fo:font-weight="bold"/>
    </style:style>
    <style:style style:family="paragraph" style:name="P39">
      <style:paragraph-properties fo:line-height="115%" fo:margin-left="0cm" fo:margin-right="0cm" fo:text-indent="0cm" fo:margin-top="0pt" fo:margin-bottom="0pt" fo:border="none"/>
      <style:text-properties/>
    </style:style>
    <style:style style:family="text" style:name="T749">
      <style:text-properties fo:color="#1f1f1f" fo:font-family="Arial" style:font-family-asian="Arial" style:font-family-complex="Arial" fo:font-size="12pt"/>
    </style:style>
    <style:style style:parent-style-name="950" style:family="paragraph" style:name="P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0">
      <style:text-properties fo:color="#1f1f1f" fo:font-family="Arial" style:font-family-asian="Arial" style:font-family-complex="Arial" fo:font-size="12pt" fo:font-weight="bold"/>
    </style:style>
    <style:style style:family="paragraph" style:name="P41">
      <style:paragraph-properties fo:line-height="115%" fo:margin-left="0cm" fo:margin-right="0cm" fo:text-indent="0cm" fo:margin-top="0pt" fo:margin-bottom="0pt" fo:border="none"/>
      <style:text-properties/>
    </style:style>
    <style:style style:family="text" style:name="T751">
      <style:text-properties fo:color="#1f1f1f" fo:font-family="Arial" style:font-family-asian="Arial" style:font-family-complex="Arial" fo:font-size="12pt"/>
    </style:style>
    <style:style style:parent-style-name="950" style:family="paragraph" style:name="P4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2">
      <style:text-properties fo:color="#1f1f1f" fo:font-family="Arial" style:font-family-asian="Arial" style:font-family-complex="Arial" fo:font-size="12pt" fo:font-weight="bold"/>
    </style:style>
    <style:style style:family="paragraph" style:name="P43">
      <style:paragraph-properties fo:line-height="115%" fo:margin-left="0cm" fo:margin-right="0cm" fo:text-indent="0cm" fo:margin-top="0pt" fo:margin-bottom="0pt" fo:border="none"/>
      <style:text-properties/>
    </style:style>
    <style:style style:family="text" style:name="T753">
      <style:text-properties fo:color="#1f1f1f" fo:font-family="Arial" style:font-family-asian="Arial" style:font-family-complex="Arial" fo:font-size="12pt"/>
    </style:style>
    <style:style style:parent-style-name="949" style:family="paragraph" style:name="P4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54">
      <style:text-properties fo:color="#1f1f1f" fo:font-family="Arial" style:font-family-asian="Arial" style:font-family-complex="Arial" fo:font-size="14pt" fo:font-weight="bold"/>
    </style:style>
    <style:style style:parent-style-name="1010" style:list-style-name="WWNum11" style:family="paragraph" style:name="P45">
      <style:paragraph-properties fo:line-height="115%" fo:margin-right="0cm" fo:margin-top="0pt" fo:margin-bottom="0pt" fo:border="none"/>
      <style:text-properties/>
    </style:style>
    <style:style style:family="text" style:name="T755">
      <style:text-properties fo:color="#1f1f1f" fo:font-family="Arial" style:font-family-asian="Arial" style:font-family-complex="Arial" fo:font-size="12pt"/>
    </style:style>
    <style:style style:parent-style-name="1010" style:list-style-name="WWNum11" style:family="paragraph" style:name="P46">
      <style:paragraph-properties fo:line-height="115%" fo:margin-right="0cm" fo:margin-top="0pt" fo:margin-bottom="0pt" fo:border="none"/>
      <style:text-properties/>
    </style:style>
    <style:style style:family="text" style:name="T756">
      <style:text-properties fo:color="#1f1f1f" fo:font-family="Arial" style:font-family-asian="Arial" style:font-family-complex="Arial" fo:font-size="12pt"/>
    </style:style>
    <style:style style:parent-style-name="1010" style:list-style-name="WWNum11" style:family="paragraph" style:name="P47">
      <style:paragraph-properties fo:line-height="115%" fo:margin-right="0cm" fo:margin-top="0pt" fo:margin-bottom="0pt" fo:border="none"/>
      <style:text-properties/>
    </style:style>
    <style:style style:family="text" style:name="T757">
      <style:text-properties fo:color="#1f1f1f" fo:font-family="Arial" style:font-family-asian="Arial" style:font-family-complex="Arial" fo:font-size="12pt"/>
    </style:style>
    <style:style style:parent-style-name="1010" style:list-style-name="WWNum11" style:family="paragraph" style:name="P48">
      <style:paragraph-properties fo:line-height="115%" fo:margin-right="0cm" fo:margin-top="0pt" fo:margin-bottom="0pt" fo:border="none"/>
      <style:text-properties/>
    </style:style>
    <style:style style:family="text" style:name="T758">
      <style:text-properties fo:color="#1f1f1f" fo:font-family="Arial" style:font-family-asian="Arial" style:font-family-complex="Arial" fo:font-size="12pt"/>
    </style:style>
    <style:style style:family="paragraph" style:name="P49">
      <style:paragraph-properties/>
      <style:text-properties/>
    </style:style>
    <style:style style:parent-style-name="949" style:family="paragraph" style:name="P5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59">
      <style:text-properties fo:color="#1f1f1f" fo:font-family="Arial" style:font-family-asian="Arial" style:font-family-complex="Arial" fo:font-size="14pt" fo:font-weight="bold"/>
    </style:style>
    <style:style style:family="paragraph" style:name="P51">
      <style:paragraph-properties fo:line-height="115%" fo:margin-left="0cm" fo:margin-right="0cm" fo:text-indent="0cm" fo:margin-top="0pt" fo:margin-bottom="0pt" fo:border="none"/>
      <style:text-properties/>
    </style:style>
    <style:style style:family="text" style:name="T760">
      <style:text-properties fo:color="#1f1f1f" fo:font-family="Arial" style:font-family-asian="Arial" style:font-family-complex="Arial" fo:font-size="12pt"/>
    </style:style>
    <style:style style:parent-style-name="950" style:family="paragraph" style:name="P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1">
      <style:text-properties fo:color="#1f1f1f" fo:font-family="Arial" style:font-family-asian="Arial" style:font-family-complex="Arial" fo:font-size="12pt" fo:font-weight="bold"/>
    </style:style>
    <style:style style:family="paragraph" style:name="P53">
      <style:paragraph-properties fo:line-height="115%" fo:margin-left="0cm" fo:margin-right="0cm" fo:text-indent="0cm" fo:margin-top="0pt" fo:margin-bottom="0pt" fo:border="none"/>
      <style:text-properties/>
    </style:style>
    <style:style style:family="text" style:name="T762">
      <style:text-properties fo:color="#1f1f1f" fo:font-family="Arial" style:font-family-asian="Arial" style:font-family-complex="Arial" fo:font-size="12pt"/>
    </style:style>
    <style:style style:family="text" style:name="T763">
      <style:text-properties fo:color="#1f1f1f" fo:font-family="Arial" style:font-family-asian="Arial" style:font-family-complex="Arial" fo:font-size="12pt"/>
    </style:style>
    <style:style style:parent-style-name="950" style:family="paragraph" style:name="P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4">
      <style:text-properties fo:color="#1f1f1f" fo:font-family="Arial" style:font-family-asian="Arial" style:font-family-complex="Arial" fo:font-size="12pt" fo:font-weight="bold"/>
    </style:style>
    <style:style style:family="paragraph" style:name="P55">
      <style:paragraph-properties fo:line-height="115%" fo:margin-left="0cm" fo:margin-right="0cm" fo:text-indent="0cm" fo:margin-top="0pt" fo:margin-bottom="0pt" fo:border="none"/>
      <style:text-properties/>
    </style:style>
    <style:style style:family="text" style:name="T765">
      <style:text-properties fo:color="#1f1f1f" fo:font-family="Arial" style:font-family-asian="Arial" style:font-family-complex="Arial" fo:font-size="12pt"/>
    </style:style>
    <style:style style:parent-style-name="950" style:family="paragraph" style:name="P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6">
      <style:text-properties fo:color="#1f1f1f" fo:font-family="Arial" style:font-family-asian="Arial" style:font-family-complex="Arial" fo:font-size="12pt" fo:font-weight="bold"/>
    </style:style>
    <style:style style:family="paragraph" style:name="P57">
      <style:paragraph-properties fo:line-height="115%" fo:margin-left="0cm" fo:margin-right="0cm" fo:text-indent="0cm" fo:margin-top="0pt" fo:margin-bottom="0pt" fo:border="none"/>
      <style:text-properties/>
    </style:style>
    <style:style style:family="text" style:name="T767">
      <style:text-properties fo:color="#1f1f1f" fo:font-family="Arial" style:font-family-asian="Arial" style:font-family-complex="Arial" fo:font-size="12pt"/>
    </style:style>
    <style:style style:parent-style-name="950" style:family="paragraph" style:name="P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8">
      <style:text-properties fo:color="#1f1f1f" fo:font-family="Arial" style:font-family-asian="Arial" style:font-family-complex="Arial" fo:font-size="12pt" fo:font-weight="bold"/>
    </style:style>
    <style:style style:family="paragraph" style:name="P59">
      <style:paragraph-properties fo:line-height="115%" fo:margin-left="0cm" fo:margin-right="0cm" fo:text-indent="0cm" fo:margin-top="0pt" fo:margin-bottom="0pt" fo:border="none"/>
      <style:text-properties/>
    </style:style>
    <style:style style:family="text" style:name="T769">
      <style:text-properties fo:color="#1f1f1f" fo:font-family="Arial" style:font-family-asian="Arial" style:font-family-complex="Arial" fo:font-size="12pt"/>
    </style:style>
    <style:style style:family="text" style:name="T770">
      <style:text-properties fo:color="#1f1f1f" fo:font-family="Arial" style:font-family-asian="Arial" style:font-family-complex="Arial" fo:font-size="12pt"/>
    </style:style>
    <style:style style:parent-style-name="949" style:family="paragraph" style:name="P6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71">
      <style:text-properties fo:color="#1f1f1f" fo:font-family="Arial" style:font-family-asian="Arial" style:font-family-complex="Arial" fo:font-size="14pt" fo:font-weight="bold"/>
    </style:style>
    <style:style style:parent-style-name="1010" style:list-style-name="WWNum12" style:family="paragraph" style:name="P61">
      <style:paragraph-properties fo:line-height="115%" fo:margin-right="0cm" fo:margin-top="0pt" fo:margin-bottom="0pt" fo:border="none"/>
      <style:text-properties/>
    </style:style>
    <style:style style:family="text" style:name="T772">
      <style:text-properties fo:color="#1f1f1f" fo:font-family="Arial" style:font-family-asian="Arial" style:font-family-complex="Arial" fo:font-size="12pt"/>
    </style:style>
    <style:style style:parent-style-name="1010" style:list-style-name="WWNum12" style:family="paragraph" style:name="P62">
      <style:paragraph-properties fo:line-height="115%" fo:margin-right="0cm" fo:margin-top="0pt" fo:margin-bottom="0pt" fo:border="none"/>
      <style:text-properties/>
    </style:style>
    <style:style style:family="text" style:name="T773">
      <style:text-properties fo:color="#1f1f1f" fo:font-family="Arial" style:font-family-asian="Arial" style:font-family-complex="Arial" fo:font-size="12pt"/>
    </style:style>
    <style:style style:parent-style-name="1010" style:list-style-name="WWNum12" style:family="paragraph" style:name="P63">
      <style:paragraph-properties fo:line-height="115%" fo:margin-right="0cm" fo:margin-top="0pt" fo:margin-bottom="0pt" fo:border="none"/>
      <style:text-properties/>
    </style:style>
    <style:style style:family="text" style:name="T774">
      <style:text-properties fo:color="#1f1f1f" fo:font-family="Arial" style:font-family-asian="Arial" style:font-family-complex="Arial" fo:font-size="12pt"/>
    </style:style>
    <style:style style:parent-style-name="1010" style:list-style-name="WWNum12" style:family="paragraph" style:name="P64">
      <style:paragraph-properties fo:line-height="115%" fo:margin-right="0cm" fo:margin-top="0pt" fo:margin-bottom="0pt" fo:border="none"/>
      <style:text-properties/>
    </style:style>
    <style:style style:family="text" style:name="T775">
      <style:text-properties fo:color="#1f1f1f" fo:font-family="Arial" style:font-family-asian="Arial" style:font-family-complex="Arial" fo:font-size="12pt"/>
    </style:style>
    <style:style style:family="paragraph" style:name="P65">
      <style:paragraph-properties/>
      <style:text-properties/>
    </style:style>
    <style:style style:parent-style-name="949" style:family="paragraph" style:name="P6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76">
      <style:text-properties fo:color="#1f1f1f" fo:font-family="Arial" style:font-family-asian="Arial" style:font-family-complex="Arial" fo:font-size="14pt" fo:font-weight="bold"/>
    </style:style>
    <style:style style:family="paragraph" style:name="P67">
      <style:paragraph-properties fo:line-height="115%" fo:margin-left="0cm" fo:margin-right="0cm" fo:text-indent="0cm" fo:margin-top="0pt" fo:margin-bottom="0pt" fo:border="none"/>
      <style:text-properties/>
    </style:style>
    <style:style style:family="text" style:name="T777">
      <style:text-properties fo:color="#1f1f1f" fo:font-family="Arial" style:font-family-asian="Arial" style:font-family-complex="Arial" fo:font-size="12pt"/>
    </style:style>
    <style:style style:parent-style-name="950" style:family="paragraph" style:name="P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78">
      <style:text-properties fo:color="#1f1f1f" fo:font-family="Arial" style:font-family-asian="Arial" style:font-family-complex="Arial" fo:font-size="12pt" fo:font-weight="bold"/>
    </style:style>
    <style:style style:family="paragraph" style:name="P69">
      <style:paragraph-properties fo:line-height="115%" fo:margin-left="0cm" fo:margin-right="0cm" fo:text-indent="0cm" fo:margin-top="0pt" fo:margin-bottom="0pt" fo:border="none"/>
      <style:text-properties/>
    </style:style>
    <style:style style:family="text" style:name="T779">
      <style:text-properties fo:color="#1f1f1f" fo:font-family="Arial" style:font-family-asian="Arial" style:font-family-complex="Arial" fo:font-size="12pt"/>
    </style:style>
    <style:style style:family="text" style:name="T780">
      <style:text-properties fo:color="#1f1f1f" fo:font-family="Arial" style:font-family-asian="Arial" style:font-family-complex="Arial" fo:font-size="12pt"/>
    </style:style>
    <style:style style:parent-style-name="950" style:family="paragraph" style:name="P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1">
      <style:text-properties fo:color="#1f1f1f" fo:font-family="Arial" style:font-family-asian="Arial" style:font-family-complex="Arial" fo:font-size="12pt" fo:font-weight="bold"/>
    </style:style>
    <style:style style:family="paragraph" style:name="P71">
      <style:paragraph-properties fo:line-height="115%" fo:margin-left="0cm" fo:margin-right="0cm" fo:text-indent="0cm" fo:margin-top="0pt" fo:margin-bottom="0pt" fo:border="none"/>
      <style:text-properties/>
    </style:style>
    <style:style style:family="text" style:name="T782">
      <style:text-properties fo:color="#1f1f1f" fo:font-family="Arial" style:font-family-asian="Arial" style:font-family-complex="Arial" fo:font-size="12pt"/>
    </style:style>
    <style:style style:family="text" style:name="T783">
      <style:text-properties fo:color="#1f1f1f" fo:font-family="Arial" style:font-family-asian="Arial" style:font-family-complex="Arial" fo:font-size="12pt"/>
    </style:style>
    <style:style style:parent-style-name="950" style:family="paragraph" style:name="P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4">
      <style:text-properties fo:color="#1f1f1f" fo:font-family="Arial" style:font-family-asian="Arial" style:font-family-complex="Arial" fo:font-size="12pt" fo:font-weight="bold"/>
    </style:style>
    <style:style style:family="paragraph" style:name="P73">
      <style:paragraph-properties fo:line-height="115%" fo:margin-left="0cm" fo:margin-right="0cm" fo:text-indent="0cm" fo:margin-top="0pt" fo:margin-bottom="0pt" fo:border="none"/>
      <style:text-properties/>
    </style:style>
    <style:style style:family="text" style:name="T785">
      <style:text-properties fo:color="#1f1f1f" fo:font-family="Arial" style:font-family-asian="Arial" style:font-family-complex="Arial" fo:font-size="12pt"/>
    </style:style>
    <style:style style:family="text" style:name="T786">
      <style:text-properties fo:color="#1f1f1f" fo:font-family="Arial" style:font-family-asian="Arial" style:font-family-complex="Arial" fo:font-size="12pt"/>
    </style:style>
    <style:style style:parent-style-name="950" style:family="paragraph" style:name="P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7">
      <style:text-properties fo:color="#1f1f1f" fo:font-family="Arial" style:font-family-asian="Arial" style:font-family-complex="Arial" fo:font-size="12pt" fo:font-weight="bold"/>
    </style:style>
    <style:style style:family="paragraph" style:name="P75">
      <style:paragraph-properties fo:line-height="115%" fo:margin-left="0cm" fo:margin-right="0cm" fo:text-indent="0cm" fo:margin-top="0pt" fo:margin-bottom="0pt" fo:border="none"/>
      <style:text-properties/>
    </style:style>
    <style:style style:family="text" style:name="T788">
      <style:text-properties fo:color="#1f1f1f" fo:font-family="Arial" style:font-family-asian="Arial" style:font-family-complex="Arial" fo:font-size="12pt"/>
    </style:style>
    <style:style style:family="text" style:name="T789">
      <style:text-properties fo:color="#1f1f1f" fo:font-family="Arial" style:font-family-asian="Arial" style:font-family-complex="Arial" fo:font-size="12pt"/>
    </style:style>
    <style:style style:parent-style-name="949" style:family="paragraph" style:name="P7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90">
      <style:text-properties fo:color="#1f1f1f" fo:font-family="Arial" style:font-family-asian="Arial" style:font-family-complex="Arial" fo:font-size="14pt" fo:font-weight="bold"/>
    </style:style>
    <style:style style:parent-style-name="1010" style:list-style-name="WWNum13" style:family="paragraph" style:name="P77">
      <style:paragraph-properties fo:line-height="115%" fo:margin-right="0cm" fo:margin-top="0pt" fo:margin-bottom="0pt" fo:border="none"/>
      <style:text-properties/>
    </style:style>
    <style:style style:family="text" style:name="T791">
      <style:text-properties fo:color="#1f1f1f" fo:font-family="Arial" style:font-family-asian="Arial" style:font-family-complex="Arial" fo:font-size="12pt"/>
    </style:style>
    <style:style style:parent-style-name="1010" style:list-style-name="WWNum13" style:family="paragraph" style:name="P78">
      <style:paragraph-properties fo:line-height="115%" fo:margin-right="0cm" fo:margin-top="0pt" fo:margin-bottom="0pt" fo:border="none"/>
      <style:text-properties/>
    </style:style>
    <style:style style:family="text" style:name="T792">
      <style:text-properties fo:color="#1f1f1f" fo:font-family="Arial" style:font-family-asian="Arial" style:font-family-complex="Arial" fo:font-size="12pt"/>
    </style:style>
    <style:style style:parent-style-name="1010" style:list-style-name="WWNum13" style:family="paragraph" style:name="P79">
      <style:paragraph-properties fo:line-height="115%" fo:margin-right="0cm" fo:margin-top="0pt" fo:margin-bottom="0pt" fo:border="none"/>
      <style:text-properties/>
    </style:style>
    <style:style style:family="text" style:name="T793">
      <style:text-properties fo:color="#1f1f1f" fo:font-family="Arial" style:font-family-asian="Arial" style:font-family-complex="Arial" fo:font-size="12pt"/>
    </style:style>
    <style:style style:parent-style-name="1010" style:list-style-name="WWNum13" style:family="paragraph" style:name="P80">
      <style:paragraph-properties fo:line-height="115%" fo:margin-right="0cm" fo:margin-top="0pt" fo:margin-bottom="0pt" fo:border="none"/>
      <style:text-properties/>
    </style:style>
    <style:style style:family="text" style:name="T794">
      <style:text-properties fo:color="#1f1f1f" fo:font-family="Arial" style:font-family-asian="Arial" style:font-family-complex="Arial" fo:font-size="12pt"/>
    </style:style>
    <style:style style:family="paragraph" style:name="P81">
      <style:paragraph-properties/>
      <style:text-properties/>
    </style:style>
    <style:style style:parent-style-name="949" style:family="paragraph" style:name="P8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95">
      <style:text-properties fo:color="#1f1f1f" fo:font-family="Arial" style:font-family-asian="Arial" style:font-family-complex="Arial" fo:font-size="14pt" fo:font-weight="bold"/>
    </style:style>
    <style:style style:family="paragraph" style:name="P83">
      <style:paragraph-properties fo:line-height="115%" fo:margin-left="0cm" fo:margin-right="0cm" fo:text-indent="0cm" fo:margin-top="0pt" fo:margin-bottom="0pt" fo:border="none"/>
      <style:text-properties/>
    </style:style>
    <style:style style:family="text" style:name="T796">
      <style:text-properties fo:color="#1f1f1f" fo:font-family="Arial" style:font-family-asian="Arial" style:font-family-complex="Arial" fo:font-size="12pt"/>
    </style:style>
    <style:style style:parent-style-name="950" style:family="paragraph" style:name="P8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7">
      <style:text-properties fo:color="#1f1f1f" fo:font-family="Arial" style:font-family-asian="Arial" style:font-family-complex="Arial" fo:font-size="12pt" fo:font-weight="bold"/>
    </style:style>
    <style:style style:family="paragraph" style:name="P85">
      <style:paragraph-properties fo:line-height="115%" fo:margin-left="0cm" fo:margin-right="0cm" fo:text-indent="0cm" fo:margin-top="0pt" fo:margin-bottom="0pt" fo:border="none"/>
      <style:text-properties/>
    </style:style>
    <style:style style:family="text" style:name="T798">
      <style:text-properties fo:color="#1f1f1f" fo:font-family="Arial" style:font-family-asian="Arial" style:font-family-complex="Arial" fo:font-size="12pt"/>
    </style:style>
    <style:style style:parent-style-name="950" style:family="paragraph" style:name="P8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9">
      <style:text-properties fo:color="#1f1f1f" fo:font-family="Arial" style:font-family-asian="Arial" style:font-family-complex="Arial" fo:font-size="12pt" fo:font-weight="bold"/>
    </style:style>
    <style:style style:family="paragraph" style:name="P87">
      <style:paragraph-properties fo:line-height="115%" fo:margin-left="0cm" fo:margin-right="0cm" fo:text-indent="0cm" fo:margin-top="0pt" fo:margin-bottom="0pt" fo:border="none"/>
      <style:text-properties/>
    </style:style>
    <style:style style:family="text" style:name="T800">
      <style:text-properties fo:color="#1f1f1f" fo:font-family="Arial" style:font-family-asian="Arial" style:font-family-complex="Arial" fo:font-size="12pt"/>
    </style:style>
    <style:style style:parent-style-name="1010" style:list-style-name="WWNum14" style:family="paragraph" style:name="P88">
      <style:paragraph-properties fo:line-height="115%" fo:margin-right="0cm" fo:margin-top="0pt" fo:margin-bottom="0pt" fo:border="none"/>
      <style:text-properties/>
    </style:style>
    <style:style style:family="text" style:name="T801">
      <style:text-properties fo:color="#1f1f1f" fo:font-family="Arial" style:font-family-asian="Arial" style:font-family-complex="Arial" fo:font-size="12pt"/>
    </style:style>
    <style:style style:parent-style-name="1010" style:list-style-name="WWNum14" style:family="paragraph" style:name="P89">
      <style:paragraph-properties fo:line-height="115%" fo:margin-right="0cm" fo:margin-top="0pt" fo:margin-bottom="0pt" fo:border="none"/>
      <style:text-properties/>
    </style:style>
    <style:style style:family="text" style:name="T802">
      <style:text-properties fo:color="#1f1f1f" fo:font-family="Arial" style:font-family-asian="Arial" style:font-family-complex="Arial" fo:font-size="12pt"/>
    </style:style>
    <style:style style:parent-style-name="950" style:family="paragraph" style:name="P9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3">
      <style:text-properties fo:color="#1f1f1f" fo:font-family="Arial" style:font-family-asian="Arial" style:font-family-complex="Arial" fo:font-size="12pt" fo:font-weight="bold"/>
    </style:style>
    <style:style style:family="paragraph" style:name="P91">
      <style:paragraph-properties fo:line-height="115%" fo:margin-left="0cm" fo:margin-right="0cm" fo:text-indent="0cm" fo:margin-top="0pt" fo:margin-bottom="0pt" fo:border="none"/>
      <style:text-properties/>
    </style:style>
    <style:style style:family="text" style:name="T804">
      <style:text-properties fo:color="#1f1f1f" fo:font-family="Arial" style:font-family-asian="Arial" style:font-family-complex="Arial" fo:font-size="12pt"/>
    </style:style>
    <style:style style:parent-style-name="950" style:family="paragraph" style:name="P9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5">
      <style:text-properties fo:color="#1f1f1f" fo:font-family="Arial" style:font-family-asian="Arial" style:font-family-complex="Arial" fo:font-size="12pt" fo:font-weight="bold"/>
    </style:style>
    <style:style style:family="paragraph" style:name="P93">
      <style:paragraph-properties fo:line-height="115%" fo:margin-left="0cm" fo:margin-right="0cm" fo:text-indent="0cm" fo:margin-top="0pt" fo:margin-bottom="0pt" fo:border="none"/>
      <style:text-properties/>
    </style:style>
    <style:style style:family="text" style:name="T806">
      <style:text-properties fo:color="#1f1f1f" fo:font-family="Arial" style:font-family-asian="Arial" style:font-family-complex="Arial" fo:font-size="12pt"/>
    </style:style>
    <style:style style:family="table" style:name="ta1">
      <style:paragraph-properties fo:line-height="100%" fo:margin-bottom="0pt"/>
      <style:table-properties style:width="9.455cm" fo:margin-left="0cm" table:align="left" style:use-optimal-column-width="true"/>
    </style:style>
    <style:style style:family="table-column" style:name="co1">
      <style:table-column-properties style:column-width="1.24cm" style:use-optimal-column-width="true"/>
    </style:style>
    <style:style style:family="table-column" style:name="co2">
      <style:table-column-properties style:column-width="4.071cm" style:use-optimal-column-width="true"/>
    </style:style>
    <style:style style:family="table-column" style:name="co3">
      <style:table-column-properties style:column-width="4.144cm" style:use-optimal-column-width="true"/>
    </style:style>
    <style:style style:family="table-row" style:name="ro1">
      <style:table-row-properties/>
    </style:style>
    <style:style style:family="table-cell" style:name="ce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4">
      <style:paragraph-properties fo:line-height="100%" fo:margin-top="0pt" fo:margin-bottom="0pt"/>
      <style:text-properties/>
    </style:style>
    <style:style style:family="text" style:name="T807">
      <style:text-properties fo:color="#1f1f1f" fo:font-family="Arial" style:font-family-asian="Arial" style:font-family-complex="Arial" fo:font-size="12pt" fo:font-weight="bold"/>
    </style:style>
    <style:style style:family="table-cell" style:name="ce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5">
      <style:paragraph-properties fo:line-height="100%" fo:margin-top="0pt" fo:margin-bottom="0pt"/>
      <style:text-properties/>
    </style:style>
    <style:style style:family="text" style:name="T808">
      <style:text-properties fo:color="#1f1f1f" fo:font-family="Arial" style:font-family-asian="Arial" style:font-family-complex="Arial" fo:font-size="12pt" fo:font-weight="bold"/>
    </style:style>
    <style:style style:family="table-cell" style:name="ce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6">
      <style:paragraph-properties fo:line-height="100%" fo:margin-top="0pt" fo:margin-bottom="0pt"/>
      <style:text-properties/>
    </style:style>
    <style:style style:family="text" style:name="T809">
      <style:text-properties fo:color="#1f1f1f" fo:font-family="Arial" style:font-family-asian="Arial" style:font-family-complex="Arial" fo:font-size="12pt" fo:font-weight="bold"/>
    </style:style>
    <style:style style:family="table-row" style:name="ro2">
      <style:table-row-properties/>
    </style:style>
    <style:style style:family="table-cell" style:name="ce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7">
      <style:paragraph-properties fo:line-height="100%" fo:margin-top="0pt" fo:margin-bottom="0pt"/>
      <style:text-properties/>
    </style:style>
    <style:style style:family="text" style:name="T810">
      <style:text-properties fo:color="#1f1f1f" fo:font-family="Arial" style:font-family-asian="Arial" style:font-family-complex="Arial" fo:font-size="12pt"/>
    </style:style>
    <style:style style:family="table-cell" style:name="ce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8">
      <style:paragraph-properties fo:line-height="100%" fo:margin-top="0pt" fo:margin-bottom="0pt"/>
      <style:text-properties/>
    </style:style>
    <style:style style:family="text" style:name="T811">
      <style:text-properties fo:color="#1f1f1f" fo:font-family="Arial" style:font-family-asian="Arial" style:font-family-complex="Arial" fo:font-size="12pt"/>
    </style:style>
    <style:style style:family="table-cell" style:name="ce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9">
      <style:paragraph-properties fo:line-height="100%" fo:margin-top="0pt" fo:margin-bottom="0pt"/>
      <style:text-properties/>
    </style:style>
    <style:style style:family="text" style:name="T812">
      <style:text-properties fo:color="#1f1f1f" fo:font-family="Arial" style:font-family-asian="Arial" style:font-family-complex="Arial" fo:font-size="12pt"/>
    </style:style>
    <style:style style:family="table-row" style:name="ro3">
      <style:table-row-properties/>
    </style:style>
    <style:style style:family="table-cell" style:name="ce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0">
      <style:paragraph-properties fo:line-height="100%" fo:margin-top="0pt" fo:margin-bottom="0pt"/>
      <style:text-properties/>
    </style:style>
    <style:style style:family="text" style:name="T813">
      <style:text-properties fo:color="#1f1f1f" fo:font-family="Arial" style:font-family-asian="Arial" style:font-family-complex="Arial" fo:font-size="12pt"/>
    </style:style>
    <style:style style:family="table-cell" style:name="ce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1">
      <style:paragraph-properties fo:line-height="100%" fo:margin-top="0pt" fo:margin-bottom="0pt"/>
      <style:text-properties/>
    </style:style>
    <style:style style:family="text" style:name="T814">
      <style:text-properties fo:color="#1f1f1f" fo:font-family="Arial" style:font-family-asian="Arial" style:font-family-complex="Arial" fo:font-size="12pt"/>
    </style:style>
    <style:style style:family="table-cell" style:name="ce1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2">
      <style:paragraph-properties fo:line-height="100%" fo:margin-top="0pt" fo:margin-bottom="0pt"/>
      <style:text-properties/>
    </style:style>
    <style:style style:family="text" style:name="T815">
      <style:text-properties fo:color="#1f1f1f" fo:font-family="Arial" style:font-family-asian="Arial" style:font-family-complex="Arial" fo:font-size="12pt"/>
    </style:style>
    <style:style style:parent-style-name="949" style:family="paragraph" style:name="P10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16">
      <style:text-properties fo:color="#1f1f1f" fo:font-family="Arial" style:font-family-asian="Arial" style:font-family-complex="Arial" fo:font-size="14pt" fo:font-weight="bold"/>
    </style:style>
    <style:style style:parent-style-name="1010" style:list-style-name="WWNum14" style:family="paragraph" style:name="P104">
      <style:paragraph-properties fo:line-height="115%" fo:margin-right="0cm" fo:margin-top="0pt" fo:margin-bottom="0pt" fo:border="none"/>
      <style:text-properties/>
    </style:style>
    <style:style style:family="text" style:name="T817">
      <style:text-properties fo:color="#1f1f1f" fo:font-family="Arial" style:font-family-asian="Arial" style:font-family-complex="Arial" fo:font-size="12pt"/>
    </style:style>
    <style:style style:parent-style-name="1010" style:list-style-name="WWNum14" style:family="paragraph" style:name="P105">
      <style:paragraph-properties fo:line-height="115%" fo:margin-right="0cm" fo:margin-top="0pt" fo:margin-bottom="0pt" fo:border="none"/>
      <style:text-properties/>
    </style:style>
    <style:style style:family="text" style:name="T818">
      <style:text-properties fo:color="#1f1f1f" fo:font-family="Arial" style:font-family-asian="Arial" style:font-family-complex="Arial" fo:font-size="12pt"/>
    </style:style>
    <style:style style:parent-style-name="1010" style:list-style-name="WWNum14" style:family="paragraph" style:name="P106">
      <style:paragraph-properties fo:line-height="115%" fo:margin-right="0cm" fo:margin-top="0pt" fo:margin-bottom="0pt" fo:border="none"/>
      <style:text-properties/>
    </style:style>
    <style:style style:family="text" style:name="T819">
      <style:text-properties fo:color="#1f1f1f" fo:font-family="Arial" style:font-family-asian="Arial" style:font-family-complex="Arial" fo:font-size="12pt"/>
    </style:style>
    <style:style style:parent-style-name="1010" style:list-style-name="WWNum14" style:family="paragraph" style:name="P107">
      <style:paragraph-properties fo:line-height="115%" fo:margin-right="0cm" fo:margin-top="0pt" fo:margin-bottom="0pt" fo:border="none"/>
      <style:text-properties/>
    </style:style>
    <style:style style:family="text" style:name="T820">
      <style:text-properties fo:color="#1f1f1f" fo:font-family="Arial" style:font-family-asian="Arial" style:font-family-complex="Arial" fo:font-size="12pt"/>
    </style:style>
    <style:style style:family="paragraph" style:name="P108">
      <style:paragraph-properties/>
      <style:text-properties/>
    </style:style>
    <style:style style:family="paragraph" style:name="P109">
      <style:paragraph-properties fo:line-height="115%" fo:margin-left="0cm" fo:margin-right="0cm" fo:text-indent="0cm" fo:margin-top="0pt" fo:margin-bottom="0pt" fo:break-before="page" fo:border="none"/>
      <style:text-properties/>
    </style:style>
    <style:style style:family="text" style:name="T821">
      <style:text-properties fo:color="#1f1f1f" fo:font-family="Arial" style:font-family-asian="Arial" style:font-family-complex="Arial" fo:font-size="12pt"/>
    </style:style>
    <style:style style:parent-style-name="949" style:family="paragraph" style:name="P11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22">
      <style:text-properties fo:color="#1f1f1f" fo:font-family="Arial" style:font-family-asian="Arial" style:font-family-complex="Arial" fo:font-size="14pt" fo:font-weight="bold"/>
    </style:style>
    <style:style style:family="paragraph" style:name="P111">
      <style:paragraph-properties fo:line-height="115%" fo:margin-left="0cm" fo:margin-right="0cm" fo:text-indent="0cm" fo:margin-top="0pt" fo:margin-bottom="0pt" fo:border="none"/>
      <style:text-properties/>
    </style:style>
    <style:style style:family="text" style:name="T823">
      <style:text-properties fo:color="#1f1f1f" fo:font-family="Arial" style:font-family-asian="Arial" style:font-family-complex="Arial" fo:font-size="12pt"/>
    </style:style>
    <style:style style:parent-style-name="950" style:family="paragraph" style:name="P11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4">
      <style:text-properties fo:color="#1f1f1f" fo:font-family="Arial" style:font-family-asian="Arial" style:font-family-complex="Arial" fo:font-size="12pt" fo:font-weight="bold"/>
    </style:style>
    <style:style style:family="paragraph" style:name="P113">
      <style:paragraph-properties fo:line-height="115%" fo:margin-left="0cm" fo:margin-right="0cm" fo:text-indent="0cm" fo:margin-top="0pt" fo:margin-bottom="0pt" fo:border="none"/>
      <style:text-properties/>
    </style:style>
    <style:style style:family="text" style:name="T825">
      <style:text-properties fo:color="#1f1f1f" fo:font-family="Arial" style:font-family-asian="Arial" style:font-family-complex="Arial" fo:font-size="12pt"/>
    </style:style>
    <style:style style:parent-style-name="950" style:family="paragraph" style:name="P11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6">
      <style:text-properties fo:color="#1f1f1f" fo:font-family="Arial" style:font-family-asian="Arial" style:font-family-complex="Arial" fo:font-size="12pt" fo:font-weight="bold"/>
    </style:style>
    <style:style style:family="paragraph" style:name="P115">
      <style:paragraph-properties fo:line-height="115%" fo:margin-left="0cm" fo:margin-right="0cm" fo:text-indent="0cm" fo:margin-top="0pt" fo:margin-bottom="0pt" fo:border="none"/>
      <style:text-properties/>
    </style:style>
    <style:style style:family="text" style:name="T827">
      <style:text-properties fo:color="#1f1f1f" fo:font-family="Arial" style:font-family-asian="Arial" style:font-family-complex="Arial" fo:font-size="12pt"/>
    </style:style>
    <style:style style:parent-style-name="950" style:family="paragraph" style:name="P1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8">
      <style:text-properties fo:color="#1f1f1f" fo:font-family="Arial" style:font-family-asian="Arial" style:font-family-complex="Arial" fo:font-size="12pt" fo:font-weight="bold"/>
    </style:style>
    <style:style style:family="paragraph" style:name="P117">
      <style:paragraph-properties fo:line-height="115%" fo:margin-left="0cm" fo:margin-right="0cm" fo:text-indent="0cm" fo:margin-top="0pt" fo:margin-bottom="0pt" fo:border="none"/>
      <style:text-properties/>
    </style:style>
    <style:style style:family="text" style:name="T829">
      <style:text-properties fo:color="#1f1f1f" fo:font-family="Arial" style:font-family-asian="Arial" style:font-family-complex="Arial" fo:font-size="12pt"/>
    </style:style>
    <style:style style:parent-style-name="950" style:family="paragraph" style:name="P1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30">
      <style:text-properties fo:color="#1f1f1f" fo:font-family="Arial" style:font-family-asian="Arial" style:font-family-complex="Arial" fo:font-size="12pt" fo:font-weight="bold"/>
    </style:style>
    <style:style style:family="paragraph" style:name="P119">
      <style:paragraph-properties fo:line-height="115%" fo:margin-left="0cm" fo:margin-right="0cm" fo:text-indent="0cm" fo:margin-top="0pt" fo:margin-bottom="0pt" fo:border="none"/>
      <style:text-properties/>
    </style:style>
    <style:style style:family="text" style:name="T831">
      <style:text-properties fo:color="#1f1f1f" fo:font-family="Arial" style:font-family-asian="Arial" style:font-family-complex="Arial" fo:font-size="12pt"/>
    </style:style>
    <style:style style:parent-style-name="949" style:family="paragraph" style:name="P12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32">
      <style:text-properties fo:color="#1f1f1f" fo:font-family="Arial" style:font-family-asian="Arial" style:font-family-complex="Arial" fo:font-size="14pt" fo:font-weight="bold"/>
    </style:style>
    <style:style style:parent-style-name="1010" style:list-style-name="WWNum15" style:family="paragraph" style:name="P121">
      <style:paragraph-properties fo:line-height="115%" fo:margin-right="0cm" fo:margin-top="0pt" fo:margin-bottom="0pt" fo:border="none"/>
      <style:text-properties/>
    </style:style>
    <style:style style:family="text" style:name="T833">
      <style:text-properties fo:color="#1f1f1f" fo:font-family="Arial" style:font-family-asian="Arial" style:font-family-complex="Arial" fo:font-size="12pt"/>
    </style:style>
    <style:style style:parent-style-name="1010" style:list-style-name="WWNum15" style:family="paragraph" style:name="P122">
      <style:paragraph-properties fo:line-height="115%" fo:margin-right="0cm" fo:margin-top="0pt" fo:margin-bottom="0pt" fo:border="none"/>
      <style:text-properties/>
    </style:style>
    <style:style style:family="text" style:name="T834">
      <style:text-properties fo:color="#1f1f1f" fo:font-family="Arial" style:font-family-asian="Arial" style:font-family-complex="Arial" fo:font-size="12pt"/>
    </style:style>
    <style:style style:parent-style-name="1010" style:list-style-name="WWNum15" style:family="paragraph" style:name="P123">
      <style:paragraph-properties fo:line-height="115%" fo:margin-right="0cm" fo:margin-top="0pt" fo:margin-bottom="0pt" fo:border="none"/>
      <style:text-properties/>
    </style:style>
    <style:style style:family="text" style:name="T835">
      <style:text-properties fo:color="#1f1f1f" fo:font-family="Arial" style:font-family-asian="Arial" style:font-family-complex="Arial" fo:font-size="12pt"/>
    </style:style>
    <style:style style:parent-style-name="1010" style:list-style-name="WWNum15" style:family="paragraph" style:name="P124">
      <style:paragraph-properties fo:line-height="115%" fo:margin-right="0cm" fo:margin-top="0pt" fo:margin-bottom="0pt" fo:border="none"/>
      <style:text-properties/>
    </style:style>
    <style:style style:family="text" style:name="T836">
      <style:text-properties fo:color="#1f1f1f" fo:font-family="Arial" style:font-family-asian="Arial" style:font-family-complex="Arial" fo:font-size="12pt"/>
    </style:style>
    <style:style style:family="paragraph" style:name="P125">
      <style:paragraph-properties/>
      <style:text-properties/>
    </style:style>
    <style:style style:family="paragraph" style:name="P126">
      <style:paragraph-properties fo:line-height="115%" fo:margin-left="0cm" fo:margin-right="0cm" fo:text-indent="0cm" fo:margin-top="0pt" fo:margin-bottom="0pt" fo:break-before="page" fo:border="none"/>
      <style:text-properties/>
    </style:style>
    <style:style style:family="text" style:name="T837">
      <style:text-properties fo:color="#1f1f1f" fo:font-family="Arial" style:font-family-asian="Arial" style:font-family-complex="Arial" fo:font-size="12pt"/>
    </style:style>
    <style:style style:parent-style-name="949" style:family="paragraph" style:name="P12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38">
      <style:text-properties fo:color="#1f1f1f" fo:font-family="Arial" style:font-family-asian="Arial" style:font-family-complex="Arial" fo:font-size="14pt" fo:font-weight="bold"/>
    </style:style>
    <style:style style:family="paragraph" style:name="P128">
      <style:paragraph-properties fo:line-height="115%" fo:margin-left="0cm" fo:margin-right="0cm" fo:text-indent="0cm" fo:margin-top="0pt" fo:margin-bottom="0pt" fo:border="none"/>
      <style:text-properties/>
    </style:style>
    <style:style style:family="text" style:name="T839">
      <style:text-properties fo:color="#1f1f1f" fo:font-family="Arial" style:font-family-asian="Arial" style:font-family-complex="Arial" fo:font-size="12pt"/>
    </style:style>
    <style:style style:parent-style-name="950" style:family="paragraph" style:name="P12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0">
      <style:text-properties fo:color="#1f1f1f" fo:font-family="Arial" style:font-family-asian="Arial" style:font-family-complex="Arial" fo:font-size="12pt" fo:font-weight="bold"/>
    </style:style>
    <style:style style:family="paragraph" style:name="P130">
      <style:paragraph-properties fo:line-height="115%" fo:margin-left="0cm" fo:margin-right="0cm" fo:text-indent="0cm" fo:margin-top="0pt" fo:margin-bottom="0pt" fo:border="none"/>
      <style:text-properties/>
    </style:style>
    <style:style style:family="text" style:name="T841">
      <style:text-properties fo:color="#1f1f1f" fo:font-family="Arial" style:font-family-asian="Arial" style:font-family-complex="Arial" fo:font-size="12pt"/>
    </style:style>
    <style:style style:parent-style-name="950" style:family="paragraph" style:name="P13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2">
      <style:text-properties fo:color="#1f1f1f" fo:font-family="Arial" style:font-family-asian="Arial" style:font-family-complex="Arial" fo:font-size="12pt" fo:font-weight="bold"/>
    </style:style>
    <style:style style:family="paragraph" style:name="P132">
      <style:paragraph-properties fo:line-height="115%" fo:margin-left="0cm" fo:margin-right="0cm" fo:text-indent="0cm" fo:margin-top="0pt" fo:margin-bottom="0pt" fo:border="none"/>
      <style:text-properties/>
    </style:style>
    <style:style style:family="text" style:name="T843">
      <style:text-properties fo:color="#1f1f1f" fo:font-family="Arial" style:font-family-asian="Arial" style:font-family-complex="Arial" fo:font-size="12pt"/>
    </style:style>
    <style:style style:parent-style-name="950" style:family="paragraph" style:name="P1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4">
      <style:text-properties fo:color="#1f1f1f" fo:font-family="Arial" style:font-family-asian="Arial" style:font-family-complex="Arial" fo:font-size="12pt" fo:font-weight="bold"/>
    </style:style>
    <style:style style:family="paragraph" style:name="P134">
      <style:paragraph-properties fo:line-height="115%" fo:margin-left="0cm" fo:margin-right="0cm" fo:text-indent="0cm" fo:margin-top="0pt" fo:margin-bottom="0pt" fo:border="none"/>
      <style:text-properties/>
    </style:style>
    <style:style style:family="text" style:name="T845">
      <style:text-properties fo:color="#1f1f1f" fo:font-family="Arial" style:font-family-asian="Arial" style:font-family-complex="Arial" fo:font-size="12pt"/>
    </style:style>
    <style:style style:parent-style-name="950" style:family="paragraph" style:name="P13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6">
      <style:text-properties fo:color="#1f1f1f" fo:font-family="Arial" style:font-family-asian="Arial" style:font-family-complex="Arial" fo:font-size="12pt" fo:font-weight="bold"/>
    </style:style>
    <style:style style:family="paragraph" style:name="P136">
      <style:paragraph-properties fo:line-height="115%" fo:margin-left="0cm" fo:margin-right="0cm" fo:text-indent="0cm" fo:margin-top="0pt" fo:margin-bottom="0pt" fo:border="none"/>
      <style:text-properties/>
    </style:style>
    <style:style style:family="text" style:name="T847">
      <style:text-properties fo:color="#1f1f1f" fo:font-family="Arial" style:font-family-asian="Arial" style:font-family-complex="Arial" fo:font-size="12pt"/>
    </style:style>
    <style:style style:parent-style-name="949" style:family="paragraph" style:name="P13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48">
      <style:text-properties fo:color="#1f1f1f" fo:font-family="Arial" style:font-family-asian="Arial" style:font-family-complex="Arial" fo:font-size="14pt" fo:font-weight="bold"/>
    </style:style>
    <style:style style:parent-style-name="1010" style:list-style-name="WWNum16" style:family="paragraph" style:name="P138">
      <style:paragraph-properties fo:line-height="115%" fo:margin-right="0cm" fo:margin-top="0pt" fo:margin-bottom="0pt" fo:border="none"/>
      <style:text-properties/>
    </style:style>
    <style:style style:family="text" style:name="T849">
      <style:text-properties fo:color="#1f1f1f" fo:font-family="Arial" style:font-family-asian="Arial" style:font-family-complex="Arial" fo:font-size="12pt"/>
    </style:style>
    <style:style style:parent-style-name="1010" style:list-style-name="WWNum16" style:family="paragraph" style:name="P139">
      <style:paragraph-properties fo:line-height="115%" fo:margin-right="0cm" fo:margin-top="0pt" fo:margin-bottom="0pt" fo:border="none"/>
      <style:text-properties/>
    </style:style>
    <style:style style:family="text" style:name="T850">
      <style:text-properties fo:color="#1f1f1f" fo:font-family="Arial" style:font-family-asian="Arial" style:font-family-complex="Arial" fo:font-size="12pt"/>
    </style:style>
    <style:style style:parent-style-name="1010" style:list-style-name="WWNum16" style:family="paragraph" style:name="P140">
      <style:paragraph-properties fo:line-height="115%" fo:margin-right="0cm" fo:margin-top="0pt" fo:margin-bottom="0pt" fo:border="none"/>
      <style:text-properties/>
    </style:style>
    <style:style style:family="text" style:name="T851">
      <style:text-properties fo:color="#1f1f1f" fo:font-family="Arial" style:font-family-asian="Arial" style:font-family-complex="Arial" fo:font-size="12pt"/>
    </style:style>
    <style:style style:parent-style-name="1010" style:list-style-name="WWNum16" style:family="paragraph" style:name="P141">
      <style:paragraph-properties fo:line-height="115%" fo:margin-right="0cm" fo:margin-top="0pt" fo:margin-bottom="0pt" fo:border="none"/>
      <style:text-properties/>
    </style:style>
    <style:style style:family="text" style:name="T852">
      <style:text-properties fo:color="#1f1f1f" fo:font-family="Arial" style:font-family-asian="Arial" style:font-family-complex="Arial" fo:font-size="12pt"/>
    </style:style>
    <style:style style:family="paragraph" style:name="P142">
      <style:paragraph-properties/>
      <style:text-properties/>
    </style:style>
    <style:style style:family="paragraph" style:name="P143">
      <style:paragraph-properties fo:line-height="115%" fo:margin-left="0cm" fo:margin-right="0cm" fo:text-indent="0cm" fo:margin-top="0pt" fo:margin-bottom="0pt" fo:break-before="page" fo:border="none"/>
      <style:text-properties/>
    </style:style>
    <style:style style:family="text" style:name="T853">
      <style:text-properties fo:color="#1f1f1f" fo:font-family="Arial" style:font-family-asian="Arial" style:font-family-complex="Arial" fo:font-size="12pt"/>
    </style:style>
    <style:style style:parent-style-name="949" style:family="paragraph" style:name="P14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54">
      <style:text-properties fo:color="#1f1f1f" fo:font-family="Arial" style:font-family-asian="Arial" style:font-family-complex="Arial" fo:font-size="14pt" fo:font-weight="bold"/>
    </style:style>
    <style:style style:family="paragraph" style:name="P145">
      <style:paragraph-properties fo:line-height="115%" fo:margin-left="0cm" fo:margin-right="0cm" fo:text-indent="0cm" fo:margin-top="0pt" fo:margin-bottom="0pt" fo:border="none"/>
      <style:text-properties/>
    </style:style>
    <style:style style:family="text" style:name="T855">
      <style:text-properties fo:color="#1f1f1f" fo:font-family="Arial" style:font-family-asian="Arial" style:font-family-complex="Arial" fo:font-size="12pt"/>
    </style:style>
    <style:style style:parent-style-name="950" style:family="paragraph" style:name="P14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56">
      <style:text-properties fo:color="#1f1f1f" fo:font-family="Arial" style:font-family-asian="Arial" style:font-family-complex="Arial" fo:font-size="12pt" fo:font-weight="bold"/>
    </style:style>
    <style:style style:family="paragraph" style:name="P147">
      <style:paragraph-properties fo:line-height="115%" fo:margin-left="0cm" fo:margin-right="0cm" fo:text-indent="0cm" fo:margin-top="0pt" fo:margin-bottom="0pt" fo:border="none"/>
      <style:text-properties/>
    </style:style>
    <style:style style:family="text" style:name="T857">
      <style:text-properties fo:color="#1f1f1f" fo:font-family="Arial" style:font-family-asian="Arial" style:font-family-complex="Arial" fo:font-size="12pt"/>
    </style:style>
    <style:style style:parent-style-name="950" style:family="paragraph" style:name="P1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58">
      <style:text-properties fo:color="#1f1f1f" fo:font-family="Arial" style:font-family-asian="Arial" style:font-family-complex="Arial" fo:font-size="12pt" fo:font-weight="bold"/>
    </style:style>
    <style:style style:family="paragraph" style:name="P149">
      <style:paragraph-properties fo:line-height="115%" fo:margin-left="0cm" fo:margin-right="0cm" fo:text-indent="0cm" fo:margin-top="0pt" fo:margin-bottom="0pt" fo:border="none"/>
      <style:text-properties/>
    </style:style>
    <style:style style:family="text" style:name="T859">
      <style:text-properties fo:color="#1f1f1f" fo:font-family="Arial" style:font-family-asian="Arial" style:font-family-complex="Arial" fo:font-size="12pt"/>
    </style:style>
    <style:style style:parent-style-name="950" style:family="paragraph" style:name="P1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60">
      <style:text-properties fo:color="#1f1f1f" fo:font-family="Arial" style:font-family-asian="Arial" style:font-family-complex="Arial" fo:font-size="12pt" fo:font-weight="bold"/>
    </style:style>
    <style:style style:family="paragraph" style:name="P151">
      <style:paragraph-properties fo:line-height="115%" fo:margin-left="0cm" fo:margin-right="0cm" fo:text-indent="0cm" fo:margin-top="0pt" fo:margin-bottom="0pt" fo:border="none"/>
      <style:text-properties/>
    </style:style>
    <style:style style:family="text" style:name="T861">
      <style:text-properties fo:color="#1f1f1f" fo:font-family="Arial" style:font-family-asian="Arial" style:font-family-complex="Arial" fo:font-size="12pt"/>
    </style:style>
    <style:style style:parent-style-name="950" style:family="paragraph" style:name="P1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62">
      <style:text-properties fo:color="#1f1f1f" fo:font-family="Arial" style:font-family-asian="Arial" style:font-family-complex="Arial" fo:font-size="12pt" fo:font-weight="bold"/>
    </style:style>
    <style:style style:family="paragraph" style:name="P153">
      <style:paragraph-properties fo:line-height="115%" fo:margin-left="0cm" fo:margin-right="0cm" fo:text-indent="0cm" fo:margin-top="0pt" fo:margin-bottom="0pt" fo:border="none"/>
      <style:text-properties/>
    </style:style>
    <style:style style:family="text" style:name="T863">
      <style:text-properties fo:color="#1f1f1f" fo:font-family="Arial" style:font-family-asian="Arial" style:font-family-complex="Arial" fo:font-size="12pt"/>
    </style:style>
    <style:style style:parent-style-name="949" style:family="paragraph" style:name="P15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64">
      <style:text-properties fo:color="#1f1f1f" fo:font-family="Arial" style:font-family-asian="Arial" style:font-family-complex="Arial" fo:font-size="14pt" fo:font-weight="bold"/>
    </style:style>
    <style:style style:parent-style-name="1010" style:list-style-name="WWNum17" style:family="paragraph" style:name="P155">
      <style:paragraph-properties fo:line-height="115%" fo:margin-right="0cm" fo:margin-top="0pt" fo:margin-bottom="0pt" fo:border="none"/>
      <style:text-properties/>
    </style:style>
    <style:style style:family="text" style:name="T865">
      <style:text-properties fo:color="#1f1f1f" fo:font-family="Arial" style:font-family-asian="Arial" style:font-family-complex="Arial" fo:font-size="12pt"/>
    </style:style>
    <style:style style:parent-style-name="1010" style:list-style-name="WWNum17" style:family="paragraph" style:name="P156">
      <style:paragraph-properties fo:line-height="115%" fo:margin-right="0cm" fo:margin-top="0pt" fo:margin-bottom="0pt" fo:border="none"/>
      <style:text-properties/>
    </style:style>
    <style:style style:family="text" style:name="T866">
      <style:text-properties fo:color="#1f1f1f" fo:font-family="Arial" style:font-family-asian="Arial" style:font-family-complex="Arial" fo:font-size="12pt"/>
    </style:style>
    <style:style style:parent-style-name="1010" style:list-style-name="WWNum17" style:family="paragraph" style:name="P157">
      <style:paragraph-properties fo:line-height="115%" fo:margin-right="0cm" fo:margin-top="0pt" fo:margin-bottom="0pt" fo:border="none"/>
      <style:text-properties/>
    </style:style>
    <style:style style:family="text" style:name="T867">
      <style:text-properties fo:color="#1f1f1f" fo:font-family="Arial" style:font-family-asian="Arial" style:font-family-complex="Arial" fo:font-size="12pt"/>
    </style:style>
    <style:style style:parent-style-name="1010" style:list-style-name="WWNum17" style:family="paragraph" style:name="P158">
      <style:paragraph-properties fo:line-height="115%" fo:margin-right="0cm" fo:margin-top="0pt" fo:margin-bottom="0pt" fo:border="none"/>
      <style:text-properties/>
    </style:style>
    <style:style style:family="text" style:name="T868">
      <style:text-properties fo:color="#1f1f1f" fo:font-family="Arial" style:font-family-asian="Arial" style:font-family-complex="Arial" fo:font-size="12pt"/>
    </style:style>
    <style:style style:family="paragraph" style:name="P159">
      <style:paragraph-properties/>
      <style:text-properties/>
    </style:style>
    <style:style style:family="paragraph" style:name="P160">
      <style:paragraph-properties fo:line-height="115%" fo:margin-left="0cm" fo:margin-right="0cm" fo:text-indent="0cm" fo:margin-top="0pt" fo:margin-bottom="0pt" fo:break-before="page" fo:border="none"/>
      <style:text-properties/>
    </style:style>
    <style:style style:family="text" style:name="T869">
      <style:text-properties fo:color="#1f1f1f" fo:font-family="Arial" style:font-family-asian="Arial" style:font-family-complex="Arial" fo:font-size="12pt"/>
    </style:style>
    <style:style style:parent-style-name="949" style:family="paragraph" style:name="P16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70">
      <style:text-properties fo:color="#1f1f1f" fo:font-family="Arial" style:font-family-asian="Arial" style:font-family-complex="Arial" fo:font-size="14pt" fo:font-weight="bold"/>
    </style:style>
    <style:style style:family="paragraph" style:name="P162">
      <style:paragraph-properties fo:line-height="115%" fo:margin-left="0cm" fo:margin-right="0cm" fo:text-indent="0cm" fo:margin-top="0pt" fo:margin-bottom="0pt" fo:border="none"/>
      <style:text-properties/>
    </style:style>
    <style:style style:family="text" style:name="T871">
      <style:text-properties fo:color="#1f1f1f" fo:font-family="Arial" style:font-family-asian="Arial" style:font-family-complex="Arial" fo:font-size="12pt"/>
    </style:style>
    <style:style style:parent-style-name="950" style:family="paragraph" style:name="P16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2">
      <style:text-properties fo:color="#1f1f1f" fo:font-family="Arial" style:font-family-asian="Arial" style:font-family-complex="Arial" fo:font-size="12pt" fo:font-weight="bold"/>
    </style:style>
    <style:style style:family="paragraph" style:name="P164">
      <style:paragraph-properties fo:line-height="115%" fo:margin-left="0cm" fo:margin-right="0cm" fo:text-indent="0cm" fo:margin-top="0pt" fo:margin-bottom="0pt" fo:border="none"/>
      <style:text-properties/>
    </style:style>
    <style:style style:family="text" style:name="T873">
      <style:text-properties fo:color="#1f1f1f" fo:font-family="Arial" style:font-family-asian="Arial" style:font-family-complex="Arial" fo:font-size="12pt"/>
    </style:style>
    <style:style style:parent-style-name="950" style:family="paragraph" style:name="P16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4">
      <style:text-properties fo:color="#1f1f1f" fo:font-family="Arial" style:font-family-asian="Arial" style:font-family-complex="Arial" fo:font-size="12pt" fo:font-weight="bold"/>
    </style:style>
    <style:style style:family="paragraph" style:name="P166">
      <style:paragraph-properties fo:line-height="115%" fo:margin-left="0cm" fo:margin-right="0cm" fo:text-indent="0cm" fo:margin-top="0pt" fo:margin-bottom="0pt" fo:border="none"/>
      <style:text-properties/>
    </style:style>
    <style:style style:family="text" style:name="T875">
      <style:text-properties fo:color="#1f1f1f" fo:font-family="Arial" style:font-family-asian="Arial" style:font-family-complex="Arial" fo:font-size="12pt"/>
    </style:style>
    <style:style style:parent-style-name="950" style:family="paragraph" style:name="P16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6">
      <style:text-properties fo:color="#1f1f1f" fo:font-family="Arial" style:font-family-asian="Arial" style:font-family-complex="Arial" fo:font-size="12pt" fo:font-weight="bold"/>
    </style:style>
    <style:style style:family="paragraph" style:name="P168">
      <style:paragraph-properties fo:line-height="115%" fo:margin-left="0cm" fo:margin-right="0cm" fo:text-indent="0cm" fo:margin-top="0pt" fo:margin-bottom="0pt" fo:border="none"/>
      <style:text-properties/>
    </style:style>
    <style:style style:family="text" style:name="T877">
      <style:text-properties fo:color="#1f1f1f" fo:font-family="Arial" style:font-family-asian="Arial" style:font-family-complex="Arial" fo:font-size="12pt"/>
    </style:style>
    <style:style style:parent-style-name="950" style:family="paragraph" style:name="P16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8">
      <style:text-properties fo:color="#1f1f1f" fo:font-family="Arial" style:font-family-asian="Arial" style:font-family-complex="Arial" fo:font-size="12pt" fo:font-weight="bold"/>
    </style:style>
    <style:style style:family="paragraph" style:name="P170">
      <style:paragraph-properties fo:line-height="115%" fo:margin-left="0cm" fo:margin-right="0cm" fo:text-indent="0cm" fo:margin-top="0pt" fo:margin-bottom="0pt" fo:border="none"/>
      <style:text-properties/>
    </style:style>
    <style:style style:family="text" style:name="T879">
      <style:text-properties fo:color="#1f1f1f" fo:font-family="Arial" style:font-family-asian="Arial" style:font-family-complex="Arial" fo:font-size="12pt"/>
    </style:style>
    <style:style style:parent-style-name="949" style:family="paragraph" style:name="P17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80">
      <style:text-properties fo:color="#1f1f1f" fo:font-family="Arial" style:font-family-asian="Arial" style:font-family-complex="Arial" fo:font-size="14pt" fo:font-weight="bold"/>
    </style:style>
    <style:style style:parent-style-name="1010" style:list-style-name="WWNum18" style:family="paragraph" style:name="P172">
      <style:paragraph-properties fo:line-height="115%" fo:margin-right="0cm" fo:margin-top="0pt" fo:margin-bottom="0pt" fo:border="none"/>
      <style:text-properties/>
    </style:style>
    <style:style style:family="text" style:name="T881">
      <style:text-properties fo:color="#1f1f1f" fo:font-family="Arial" style:font-family-asian="Arial" style:font-family-complex="Arial" fo:font-size="12pt"/>
    </style:style>
    <style:style style:parent-style-name="1010" style:list-style-name="WWNum18" style:family="paragraph" style:name="P173">
      <style:paragraph-properties fo:line-height="115%" fo:margin-right="0cm" fo:margin-top="0pt" fo:margin-bottom="0pt" fo:border="none"/>
      <style:text-properties/>
    </style:style>
    <style:style style:family="text" style:name="T882">
      <style:text-properties fo:color="#1f1f1f" fo:font-family="Arial" style:font-family-asian="Arial" style:font-family-complex="Arial" fo:font-size="12pt"/>
    </style:style>
    <style:style style:parent-style-name="1010" style:list-style-name="WWNum18" style:family="paragraph" style:name="P174">
      <style:paragraph-properties fo:line-height="115%" fo:margin-right="0cm" fo:margin-top="0pt" fo:margin-bottom="0pt" fo:border="none"/>
      <style:text-properties/>
    </style:style>
    <style:style style:family="text" style:name="T883">
      <style:text-properties fo:color="#1f1f1f" fo:font-family="Arial" style:font-family-asian="Arial" style:font-family-complex="Arial" fo:font-size="12pt"/>
    </style:style>
    <style:style style:parent-style-name="1010" style:list-style-name="WWNum18" style:family="paragraph" style:name="P175">
      <style:paragraph-properties fo:line-height="115%" fo:margin-right="0cm" fo:margin-top="0pt" fo:margin-bottom="0pt" fo:border="none"/>
      <style:text-properties/>
    </style:style>
    <style:style style:family="text" style:name="T884">
      <style:text-properties fo:color="#1f1f1f" fo:font-family="Arial" style:font-family-asian="Arial" style:font-family-complex="Arial" fo:font-size="12pt"/>
    </style:style>
    <style:style style:family="paragraph" style:name="P176">
      <style:paragraph-properties/>
      <style:text-properties/>
    </style:style>
    <style:style style:parent-style-name="949" style:family="paragraph" style:name="P17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85">
      <style:text-properties fo:color="#1f1f1f" fo:font-family="Arial" style:font-family-asian="Arial" style:font-family-complex="Arial" fo:font-size="14pt" fo:font-weight="bold"/>
    </style:style>
    <style:style style:family="paragraph" style:name="P178">
      <style:paragraph-properties fo:line-height="115%" fo:margin-left="0cm" fo:margin-right="0cm" fo:text-indent="0cm" fo:margin-top="0pt" fo:margin-bottom="0pt" fo:border="none"/>
      <style:text-properties/>
    </style:style>
    <style:style style:family="text" style:name="T886">
      <style:text-properties fo:color="#1f1f1f" fo:font-family="Arial" style:font-family-asian="Arial" style:font-family-complex="Arial" fo:font-size="12pt"/>
    </style:style>
    <style:style style:parent-style-name="950" style:family="paragraph" style:name="P17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7">
      <style:text-properties fo:color="#1f1f1f" fo:font-family="Arial" style:font-family-asian="Arial" style:font-family-complex="Arial" fo:font-size="12pt" fo:font-weight="bold"/>
    </style:style>
    <style:style style:family="paragraph" style:name="P180">
      <style:paragraph-properties fo:line-height="115%" fo:margin-left="0cm" fo:margin-right="0cm" fo:text-indent="0cm" fo:margin-top="0pt" fo:margin-bottom="0pt" fo:border="none"/>
      <style:text-properties/>
    </style:style>
    <style:style style:family="text" style:name="T888">
      <style:text-properties fo:color="#1f1f1f" fo:font-family="Arial" style:font-family-asian="Arial" style:font-family-complex="Arial" fo:font-size="12pt"/>
    </style:style>
    <style:style style:parent-style-name="950" style:family="paragraph" style:name="P18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9">
      <style:text-properties fo:color="#1f1f1f" fo:font-family="Arial" style:font-family-asian="Arial" style:font-family-complex="Arial" fo:font-size="12pt" fo:font-weight="bold"/>
    </style:style>
    <style:style style:family="paragraph" style:name="P182">
      <style:paragraph-properties fo:line-height="115%" fo:margin-left="0cm" fo:margin-right="0cm" fo:text-indent="0cm" fo:margin-top="0pt" fo:margin-bottom="0pt" fo:border="none"/>
      <style:text-properties/>
    </style:style>
    <style:style style:family="text" style:name="T890">
      <style:text-properties fo:color="#1f1f1f" fo:font-family="Arial" style:font-family-asian="Arial" style:font-family-complex="Arial" fo:font-size="12pt"/>
    </style:style>
    <style:style style:parent-style-name="950" style:family="paragraph" style:name="P18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91">
      <style:text-properties fo:color="#1f1f1f" fo:font-family="Arial" style:font-family-asian="Arial" style:font-family-complex="Arial" fo:font-size="12pt" fo:font-weight="bold"/>
    </style:style>
    <style:style style:family="paragraph" style:name="P184">
      <style:paragraph-properties fo:line-height="115%" fo:margin-left="0cm" fo:margin-right="0cm" fo:text-indent="0cm" fo:margin-top="0pt" fo:margin-bottom="0pt" fo:border="none"/>
      <style:text-properties/>
    </style:style>
    <style:style style:family="text" style:name="T892">
      <style:text-properties fo:color="#1f1f1f" fo:font-family="Arial" style:font-family-asian="Arial" style:font-family-complex="Arial" fo:font-size="12pt"/>
    </style:style>
    <style:style style:parent-style-name="950" style:family="paragraph" style:name="P1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93">
      <style:text-properties fo:color="#1f1f1f" fo:font-family="Arial" style:font-family-asian="Arial" style:font-family-complex="Arial" fo:font-size="12pt" fo:font-weight="bold"/>
    </style:style>
    <style:style style:family="paragraph" style:name="P186">
      <style:paragraph-properties fo:line-height="115%" fo:margin-left="0cm" fo:margin-right="0cm" fo:text-indent="0cm" fo:margin-top="0pt" fo:margin-bottom="0pt" fo:border="none"/>
      <style:text-properties/>
    </style:style>
    <style:style style:family="text" style:name="T894">
      <style:text-properties fo:color="#1f1f1f" fo:font-family="Arial" style:font-family-asian="Arial" style:font-family-complex="Arial" fo:font-size="12pt"/>
    </style:style>
    <style:style style:parent-style-name="949" style:family="paragraph" style:name="P1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95">
      <style:text-properties fo:color="#1f1f1f" fo:font-family="Arial" style:font-family-asian="Arial" style:font-family-complex="Arial" fo:font-size="14pt" fo:font-weight="bold"/>
    </style:style>
    <style:style style:parent-style-name="1010" style:list-style-name="WWNum19" style:family="paragraph" style:name="P188">
      <style:paragraph-properties fo:line-height="115%" fo:margin-right="0cm" fo:margin-top="0pt" fo:margin-bottom="0pt" fo:border="none"/>
      <style:text-properties/>
    </style:style>
    <style:style style:family="text" style:name="T896">
      <style:text-properties fo:color="#1f1f1f" fo:font-family="Arial" style:font-family-asian="Arial" style:font-family-complex="Arial" fo:font-size="12pt"/>
    </style:style>
    <style:style style:parent-style-name="1010" style:list-style-name="WWNum19" style:family="paragraph" style:name="P189">
      <style:paragraph-properties fo:line-height="115%" fo:margin-right="0cm" fo:margin-top="0pt" fo:margin-bottom="0pt" fo:border="none"/>
      <style:text-properties/>
    </style:style>
    <style:style style:family="text" style:name="T897">
      <style:text-properties fo:color="#1f1f1f" fo:font-family="Arial" style:font-family-asian="Arial" style:font-family-complex="Arial" fo:font-size="12pt"/>
    </style:style>
    <style:style style:parent-style-name="1010" style:list-style-name="WWNum19" style:family="paragraph" style:name="P190">
      <style:paragraph-properties fo:line-height="115%" fo:margin-right="0cm" fo:margin-top="0pt" fo:margin-bottom="0pt" fo:border="none"/>
      <style:text-properties/>
    </style:style>
    <style:style style:family="text" style:name="T898">
      <style:text-properties fo:color="#1f1f1f" fo:font-family="Arial" style:font-family-asian="Arial" style:font-family-complex="Arial" fo:font-size="12pt"/>
    </style:style>
    <style:style style:parent-style-name="1010" style:list-style-name="WWNum19" style:family="paragraph" style:name="P191">
      <style:paragraph-properties fo:line-height="115%" fo:margin-right="0cm" fo:margin-top="0pt" fo:margin-bottom="0pt" fo:border="none"/>
      <style:text-properties/>
    </style:style>
    <style:style style:family="text" style:name="T899">
      <style:text-properties fo:color="#1f1f1f" fo:font-family="Arial" style:font-family-asian="Arial" style:font-family-complex="Arial" fo:font-size="12pt"/>
    </style:style>
    <style:style style:family="paragraph" style:name="P192">
      <style:paragraph-properties/>
      <style:text-properties/>
    </style:style>
    <style:style style:parent-style-name="949" style:family="paragraph" style:name="P19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00">
      <style:text-properties fo:color="#1f1f1f" fo:font-family="Arial" style:font-family-asian="Arial" style:font-family-complex="Arial" fo:font-size="14pt" fo:font-weight="bold"/>
    </style:style>
    <style:style style:family="paragraph" style:name="P194">
      <style:paragraph-properties fo:line-height="115%" fo:margin-left="0cm" fo:margin-right="0cm" fo:text-indent="0cm" fo:margin-top="0pt" fo:margin-bottom="0pt" fo:border="none"/>
      <style:text-properties/>
    </style:style>
    <style:style style:family="text" style:name="T901">
      <style:text-properties fo:color="#1f1f1f" fo:font-family="Arial" style:font-family-asian="Arial" style:font-family-complex="Arial" fo:font-size="12pt"/>
    </style:style>
    <style:style style:parent-style-name="950" style:family="paragraph" style:name="P1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2">
      <style:text-properties fo:color="#1f1f1f" fo:font-family="Arial" style:font-family-asian="Arial" style:font-family-complex="Arial" fo:font-size="12pt" fo:font-weight="bold"/>
    </style:style>
    <style:style style:family="paragraph" style:name="P196">
      <style:paragraph-properties fo:line-height="115%" fo:margin-left="0cm" fo:margin-right="0cm" fo:text-indent="0cm" fo:margin-top="0pt" fo:margin-bottom="0pt" fo:border="none"/>
      <style:text-properties/>
    </style:style>
    <style:style style:family="text" style:name="T903">
      <style:text-properties fo:color="#1f1f1f" fo:font-family="Arial" style:font-family-asian="Arial" style:font-family-complex="Arial" fo:font-size="12pt"/>
    </style:style>
    <style:style style:parent-style-name="950" style:family="paragraph" style:name="P1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4">
      <style:text-properties fo:color="#1f1f1f" fo:font-family="Arial" style:font-family-asian="Arial" style:font-family-complex="Arial" fo:font-size="12pt" fo:font-weight="bold"/>
    </style:style>
    <style:style style:family="paragraph" style:name="P198">
      <style:paragraph-properties fo:line-height="115%" fo:margin-left="0cm" fo:margin-right="0cm" fo:text-indent="0cm" fo:margin-top="0pt" fo:margin-bottom="0pt" fo:border="none"/>
      <style:text-properties/>
    </style:style>
    <style:style style:family="text" style:name="T905">
      <style:text-properties fo:color="#1f1f1f" fo:font-family="Arial" style:font-family-asian="Arial" style:font-family-complex="Arial" fo:font-size="12pt"/>
    </style:style>
    <style:style style:parent-style-name="950" style:family="paragraph" style:name="P1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6">
      <style:text-properties fo:color="#1f1f1f" fo:font-family="Arial" style:font-family-asian="Arial" style:font-family-complex="Arial" fo:font-size="12pt" fo:font-weight="bold"/>
    </style:style>
    <style:style style:family="paragraph" style:name="P200">
      <style:paragraph-properties fo:line-height="115%" fo:margin-left="0cm" fo:margin-right="0cm" fo:text-indent="0cm" fo:margin-top="0pt" fo:margin-bottom="0pt" fo:border="none"/>
      <style:text-properties/>
    </style:style>
    <style:style style:family="text" style:name="T907">
      <style:text-properties fo:color="#1f1f1f" fo:font-family="Arial" style:font-family-asian="Arial" style:font-family-complex="Arial" fo:font-size="12pt"/>
    </style:style>
    <style:style style:parent-style-name="950" style:family="paragraph" style:name="P2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8">
      <style:text-properties fo:color="#1f1f1f" fo:font-family="Arial" style:font-family-asian="Arial" style:font-family-complex="Arial" fo:font-size="12pt" fo:font-weight="bold"/>
    </style:style>
    <style:style style:family="paragraph" style:name="P202">
      <style:paragraph-properties fo:line-height="115%" fo:margin-left="0cm" fo:margin-right="0cm" fo:text-indent="0cm" fo:margin-top="0pt" fo:margin-bottom="0pt" fo:border="none"/>
      <style:text-properties/>
    </style:style>
    <style:style style:family="text" style:name="T909">
      <style:text-properties fo:color="#1f1f1f" fo:font-family="Arial" style:font-family-asian="Arial" style:font-family-complex="Arial" fo:font-size="12pt"/>
    </style:style>
    <style:style style:parent-style-name="949" style:family="paragraph" style:name="P20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10">
      <style:text-properties fo:color="#1f1f1f" fo:font-family="Arial" style:font-family-asian="Arial" style:font-family-complex="Arial" fo:font-size="14pt" fo:font-weight="bold"/>
    </style:style>
    <style:style style:parent-style-name="1010" style:list-style-name="WWNum20" style:family="paragraph" style:name="P204">
      <style:paragraph-properties fo:line-height="115%" fo:margin-right="0cm" fo:margin-top="0pt" fo:margin-bottom="0pt" fo:border="none"/>
      <style:text-properties/>
    </style:style>
    <style:style style:family="text" style:name="T911">
      <style:text-properties fo:color="#1f1f1f" fo:font-family="Arial" style:font-family-asian="Arial" style:font-family-complex="Arial" fo:font-size="12pt"/>
    </style:style>
    <style:style style:parent-style-name="1010" style:list-style-name="WWNum20" style:family="paragraph" style:name="P205">
      <style:paragraph-properties fo:line-height="115%" fo:margin-right="0cm" fo:margin-top="0pt" fo:margin-bottom="0pt" fo:border="none"/>
      <style:text-properties/>
    </style:style>
    <style:style style:family="text" style:name="T912">
      <style:text-properties fo:color="#1f1f1f" fo:font-family="Arial" style:font-family-asian="Arial" style:font-family-complex="Arial" fo:font-size="12pt"/>
    </style:style>
    <style:style style:parent-style-name="1010" style:list-style-name="WWNum20" style:family="paragraph" style:name="P206">
      <style:paragraph-properties fo:line-height="115%" fo:margin-right="0cm" fo:margin-top="0pt" fo:margin-bottom="0pt" fo:border="none"/>
      <style:text-properties/>
    </style:style>
    <style:style style:family="text" style:name="T913">
      <style:text-properties fo:color="#1f1f1f" fo:font-family="Arial" style:font-family-asian="Arial" style:font-family-complex="Arial" fo:font-size="12pt"/>
    </style:style>
    <style:style style:parent-style-name="1010" style:list-style-name="WWNum20" style:family="paragraph" style:name="P207">
      <style:paragraph-properties fo:line-height="115%" fo:margin-right="0cm" fo:margin-top="0pt" fo:margin-bottom="0pt" fo:border="none"/>
      <style:text-properties/>
    </style:style>
    <style:style style:family="text" style:name="T914">
      <style:text-properties fo:color="#1f1f1f" fo:font-family="Arial" style:font-family-asian="Arial" style:font-family-complex="Arial" fo:font-size="12pt"/>
    </style:style>
    <style:style style:family="paragraph" style:name="P208">
      <style:paragraph-properties/>
      <style:text-properties/>
    </style:style>
    <style:style style:family="paragraph" style:name="P209">
      <style:paragraph-properties fo:line-height="115%" fo:margin-left="0cm" fo:margin-right="0cm" fo:text-indent="0cm" fo:margin-top="0pt" fo:margin-bottom="0pt" fo:break-before="page" fo:border="none"/>
      <style:text-properties/>
    </style:style>
    <style:style style:family="text" style:name="T915">
      <style:text-properties fo:color="#1f1f1f" fo:font-family="Arial" style:font-family-asian="Arial" style:font-family-complex="Arial" fo:font-size="12pt"/>
    </style:style>
    <style:style style:parent-style-name="949" style:family="paragraph" style:name="P21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16">
      <style:text-properties fo:color="#1f1f1f" fo:font-family="Arial" style:font-family-asian="Arial" style:font-family-complex="Arial" fo:font-size="14pt" fo:font-weight="bold"/>
    </style:style>
    <style:style style:family="paragraph" style:name="P211">
      <style:paragraph-properties fo:line-height="115%" fo:margin-left="0cm" fo:margin-right="0cm" fo:text-indent="0cm" fo:margin-top="0pt" fo:margin-bottom="0pt" fo:border="none"/>
      <style:text-properties/>
    </style:style>
    <style:style style:family="text" style:name="T917">
      <style:text-properties fo:color="#1f1f1f" fo:font-family="Arial" style:font-family-asian="Arial" style:font-family-complex="Arial" fo:font-size="12pt"/>
    </style:style>
    <style:style style:parent-style-name="950" style:family="paragraph" style:name="P21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18">
      <style:text-properties fo:color="#1f1f1f" fo:font-family="Arial" style:font-family-asian="Arial" style:font-family-complex="Arial" fo:font-size="12pt" fo:font-weight="bold"/>
    </style:style>
    <style:style style:family="paragraph" style:name="P213">
      <style:paragraph-properties fo:line-height="115%" fo:margin-left="0cm" fo:margin-right="0cm" fo:text-indent="0cm" fo:margin-top="0pt" fo:margin-bottom="0pt" fo:border="none"/>
      <style:text-properties/>
    </style:style>
    <style:style style:family="text" style:name="T919">
      <style:text-properties fo:color="#1f1f1f" fo:font-family="Arial" style:font-family-asian="Arial" style:font-family-complex="Arial" fo:font-size="12pt"/>
    </style:style>
    <style:style style:parent-style-name="950" style:family="paragraph" style:name="P21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20">
      <style:text-properties fo:color="#1f1f1f" fo:font-family="Arial" style:font-family-asian="Arial" style:font-family-complex="Arial" fo:font-size="12pt" fo:font-weight="bold"/>
    </style:style>
    <style:style style:family="paragraph" style:name="P215">
      <style:paragraph-properties fo:line-height="115%" fo:margin-left="0cm" fo:margin-right="0cm" fo:text-indent="0cm" fo:margin-top="0pt" fo:margin-bottom="0pt" fo:border="none"/>
      <style:text-properties/>
    </style:style>
    <style:style style:family="text" style:name="T921">
      <style:text-properties fo:color="#1f1f1f" fo:font-family="Arial" style:font-family-asian="Arial" style:font-family-complex="Arial" fo:font-size="12pt"/>
    </style:style>
    <style:style style:parent-style-name="950" style:family="paragraph" style:name="P2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22">
      <style:text-properties fo:color="#1f1f1f" fo:font-family="Arial" style:font-family-asian="Arial" style:font-family-complex="Arial" fo:font-size="12pt" fo:font-weight="bold"/>
    </style:style>
    <style:style style:family="paragraph" style:name="P217">
      <style:paragraph-properties fo:line-height="115%" fo:margin-left="0cm" fo:margin-right="0cm" fo:text-indent="0cm" fo:margin-top="0pt" fo:margin-bottom="0pt" fo:border="none"/>
      <style:text-properties/>
    </style:style>
    <style:style style:family="text" style:name="T923">
      <style:text-properties fo:color="#1f1f1f" fo:font-family="Arial" style:font-family-asian="Arial" style:font-family-complex="Arial" fo:font-size="12pt"/>
    </style:style>
    <style:style style:parent-style-name="950" style:family="paragraph" style:name="P2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24">
      <style:text-properties fo:color="#1f1f1f" fo:font-family="Arial" style:font-family-asian="Arial" style:font-family-complex="Arial" fo:font-size="12pt" fo:font-weight="bold"/>
    </style:style>
    <style:style style:family="paragraph" style:name="P219">
      <style:paragraph-properties fo:line-height="115%" fo:margin-left="0cm" fo:margin-right="0cm" fo:text-indent="0cm" fo:margin-top="0pt" fo:margin-bottom="0pt" fo:border="none"/>
      <style:text-properties/>
    </style:style>
    <style:style style:family="text" style:name="T925">
      <style:text-properties fo:color="#1f1f1f" fo:font-family="Arial" style:font-family-asian="Arial" style:font-family-complex="Arial" fo:font-size="12pt"/>
    </style:style>
    <style:style style:parent-style-name="949" style:family="paragraph" style:name="P22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26">
      <style:text-properties fo:color="#1f1f1f" fo:font-family="Arial" style:font-family-asian="Arial" style:font-family-complex="Arial" fo:font-size="14pt" fo:font-weight="bold"/>
    </style:style>
    <style:style style:parent-style-name="1010" style:list-style-name="WWNum21" style:family="paragraph" style:name="P221">
      <style:paragraph-properties fo:line-height="115%" fo:margin-right="0cm" fo:margin-top="0pt" fo:margin-bottom="0pt" fo:border="none"/>
      <style:text-properties/>
    </style:style>
    <style:style style:family="text" style:name="T927">
      <style:text-properties fo:color="#1f1f1f" fo:font-family="Arial" style:font-family-asian="Arial" style:font-family-complex="Arial" fo:font-size="12pt"/>
    </style:style>
    <style:style style:parent-style-name="1010" style:list-style-name="WWNum21" style:family="paragraph" style:name="P222">
      <style:paragraph-properties fo:line-height="115%" fo:margin-right="0cm" fo:margin-top="0pt" fo:margin-bottom="0pt" fo:border="none"/>
      <style:text-properties/>
    </style:style>
    <style:style style:family="text" style:name="T928">
      <style:text-properties fo:color="#1f1f1f" fo:font-family="Arial" style:font-family-asian="Arial" style:font-family-complex="Arial" fo:font-size="12pt"/>
    </style:style>
    <style:style style:parent-style-name="1010" style:list-style-name="WWNum21" style:family="paragraph" style:name="P223">
      <style:paragraph-properties fo:line-height="115%" fo:margin-right="0cm" fo:margin-top="0pt" fo:margin-bottom="0pt" fo:border="none"/>
      <style:text-properties/>
    </style:style>
    <style:style style:family="text" style:name="T929">
      <style:text-properties fo:color="#1f1f1f" fo:font-family="Arial" style:font-family-asian="Arial" style:font-family-complex="Arial" fo:font-size="12pt"/>
    </style:style>
    <style:style style:parent-style-name="1010" style:list-style-name="WWNum21" style:family="paragraph" style:name="P224">
      <style:paragraph-properties fo:line-height="115%" fo:margin-right="0cm" fo:margin-top="0pt" fo:margin-bottom="0pt" fo:border="none"/>
      <style:text-properties/>
    </style:style>
    <style:style style:family="text" style:name="T930">
      <style:text-properties fo:color="#1f1f1f" fo:font-family="Arial" style:font-family-asian="Arial" style:font-family-complex="Arial" fo:font-size="12pt"/>
    </style:style>
    <style:style style:family="paragraph" style:name="P225">
      <style:paragraph-properties/>
      <style:text-properties/>
    </style:style>
    <style:style style:parent-style-name="949" style:family="paragraph" style:name="P22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31">
      <style:text-properties fo:color="#1f1f1f" fo:font-family="Arial" style:font-family-asian="Arial" style:font-family-complex="Arial" fo:font-size="14pt" fo:font-weight="bold"/>
    </style:style>
    <style:style style:family="paragraph" style:name="P227">
      <style:paragraph-properties fo:line-height="115%" fo:margin-left="0cm" fo:margin-right="0cm" fo:text-indent="0cm" fo:margin-top="0pt" fo:margin-bottom="0pt" fo:border="none"/>
      <style:text-properties/>
    </style:style>
    <style:style style:family="text" style:name="T932">
      <style:text-properties fo:color="#1f1f1f" fo:font-family="Arial" style:font-family-asian="Arial" style:font-family-complex="Arial" fo:font-size="12pt"/>
    </style:style>
    <style:style style:parent-style-name="950" style:family="paragraph" style:name="P22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3">
      <style:text-properties fo:color="#1f1f1f" fo:font-family="Arial" style:font-family-asian="Arial" style:font-family-complex="Arial" fo:font-size="12pt" fo:font-weight="bold"/>
    </style:style>
    <style:style style:family="paragraph" style:name="P229">
      <style:paragraph-properties fo:line-height="115%" fo:margin-left="0cm" fo:margin-right="0cm" fo:text-indent="0cm" fo:margin-top="0pt" fo:margin-bottom="0pt" fo:border="none"/>
      <style:text-properties/>
    </style:style>
    <style:style style:family="text" style:name="T934">
      <style:text-properties fo:color="#1f1f1f" fo:font-family="Arial" style:font-family-asian="Arial" style:font-family-complex="Arial" fo:font-size="12pt"/>
    </style:style>
    <style:style style:family="text" style:name="T935">
      <style:text-properties fo:color="#1f1f1f" fo:font-family="Arial" style:font-family-asian="Arial" style:font-family-complex="Arial" fo:font-size="12pt"/>
    </style:style>
    <style:style style:parent-style-name="950" style:family="paragraph" style:name="P23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6">
      <style:text-properties fo:color="#1f1f1f" fo:font-family="Arial" style:font-family-asian="Arial" style:font-family-complex="Arial" fo:font-size="12pt" fo:font-weight="bold"/>
    </style:style>
    <style:style style:family="paragraph" style:name="P231">
      <style:paragraph-properties fo:line-height="115%" fo:margin-left="0cm" fo:margin-right="0cm" fo:text-indent="0cm" fo:margin-top="0pt" fo:margin-bottom="0pt" fo:border="none"/>
      <style:text-properties/>
    </style:style>
    <style:style style:family="text" style:name="T937">
      <style:text-properties fo:color="#1f1f1f" fo:font-family="Arial" style:font-family-asian="Arial" style:font-family-complex="Arial" fo:font-size="12pt"/>
    </style:style>
    <style:style style:parent-style-name="950" style:family="paragraph" style:name="P2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8">
      <style:text-properties fo:color="#1f1f1f" fo:font-family="Arial" style:font-family-asian="Arial" style:font-family-complex="Arial" fo:font-size="12pt" fo:font-weight="bold"/>
    </style:style>
    <style:style style:family="paragraph" style:name="P233">
      <style:paragraph-properties fo:line-height="115%" fo:margin-left="0cm" fo:margin-right="0cm" fo:text-indent="0cm" fo:margin-top="0pt" fo:margin-bottom="0pt" fo:border="none"/>
      <style:text-properties/>
    </style:style>
    <style:style style:family="text" style:name="T939">
      <style:text-properties fo:color="#1f1f1f" fo:font-family="Arial" style:font-family-asian="Arial" style:font-family-complex="Arial" fo:font-size="12pt"/>
    </style:style>
    <style:style style:parent-style-name="950" style:family="paragraph" style:name="P23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40">
      <style:text-properties fo:color="#1f1f1f" fo:font-family="Arial" style:font-family-asian="Arial" style:font-family-complex="Arial" fo:font-size="12pt" fo:font-weight="bold"/>
    </style:style>
    <style:style style:family="paragraph" style:name="P235">
      <style:paragraph-properties fo:line-height="115%" fo:margin-left="0cm" fo:margin-right="0cm" fo:text-indent="0cm" fo:margin-top="0pt" fo:margin-bottom="0pt" fo:border="none"/>
      <style:text-properties/>
    </style:style>
    <style:style style:family="text" style:name="T941">
      <style:text-properties fo:color="#1f1f1f" fo:font-family="Arial" style:font-family-asian="Arial" style:font-family-complex="Arial" fo:font-size="12pt"/>
    </style:style>
    <style:style style:parent-style-name="949" style:family="paragraph" style:name="P23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42">
      <style:text-properties fo:color="#1f1f1f" fo:font-family="Arial" style:font-family-asian="Arial" style:font-family-complex="Arial" fo:font-size="14pt" fo:font-weight="bold"/>
    </style:style>
    <style:style style:parent-style-name="1010" style:list-style-name="WWNum22" style:family="paragraph" style:name="P237">
      <style:paragraph-properties fo:line-height="115%" fo:margin-right="0cm" fo:margin-top="0pt" fo:margin-bottom="0pt" fo:border="none"/>
      <style:text-properties/>
    </style:style>
    <style:style style:family="text" style:name="T943">
      <style:text-properties fo:color="#1f1f1f" fo:font-family="Arial" style:font-family-asian="Arial" style:font-family-complex="Arial" fo:font-size="12pt"/>
    </style:style>
    <style:style style:parent-style-name="1010" style:list-style-name="WWNum22" style:family="paragraph" style:name="P238">
      <style:paragraph-properties fo:line-height="115%" fo:margin-right="0cm" fo:margin-top="0pt" fo:margin-bottom="0pt" fo:border="none"/>
      <style:text-properties/>
    </style:style>
    <style:style style:family="text" style:name="T944">
      <style:text-properties fo:color="#1f1f1f" fo:font-family="Arial" style:font-family-asian="Arial" style:font-family-complex="Arial" fo:font-size="12pt"/>
    </style:style>
    <style:style style:parent-style-name="1010" style:list-style-name="WWNum22" style:family="paragraph" style:name="P239">
      <style:paragraph-properties fo:line-height="115%" fo:margin-right="0cm" fo:margin-top="0pt" fo:margin-bottom="0pt" fo:border="none"/>
      <style:text-properties/>
    </style:style>
    <style:style style:family="text" style:name="T945">
      <style:text-properties fo:color="#1f1f1f" fo:font-family="Arial" style:font-family-asian="Arial" style:font-family-complex="Arial" fo:font-size="12pt"/>
    </style:style>
    <style:style style:parent-style-name="1010" style:list-style-name="WWNum22" style:family="paragraph" style:name="P240">
      <style:paragraph-properties fo:line-height="115%" fo:margin-right="0cm" fo:margin-top="0pt" fo:margin-bottom="0pt" fo:border="none"/>
      <style:text-properties/>
    </style:style>
    <style:style style:family="text" style:name="T946">
      <style:text-properties fo:color="#1f1f1f" fo:font-family="Arial" style:font-family-asian="Arial" style:font-family-complex="Arial" fo:font-size="12pt"/>
    </style:style>
    <style:style style:family="paragraph" style:name="P241">
      <style:paragraph-properties/>
      <style:text-properties/>
    </style:style>
    <style:style style:family="paragraph" style:name="P242">
      <style:paragraph-properties fo:line-height="115%" fo:margin-left="0cm" fo:margin-right="0cm" fo:text-indent="0cm" fo:margin-top="0pt" fo:margin-bottom="0pt" fo:break-before="page" fo:border="none"/>
      <style:text-properties/>
    </style:style>
    <style:style style:family="text" style:name="T947">
      <style:text-properties fo:color="#1f1f1f" fo:font-family="Arial" style:font-family-asian="Arial" style:font-family-complex="Arial" fo:font-size="12pt"/>
    </style:style>
    <style:style style:parent-style-name="949" style:family="paragraph" style:name="P24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48">
      <style:text-properties fo:color="#1f1f1f" fo:font-family="Arial" style:font-family-asian="Arial" style:font-family-complex="Arial" fo:font-size="14pt" fo:font-weight="bold"/>
    </style:style>
    <style:style style:family="paragraph" style:name="P244">
      <style:paragraph-properties fo:line-height="115%" fo:margin-left="0cm" fo:margin-right="0cm" fo:text-indent="0cm" fo:margin-top="0pt" fo:margin-bottom="0pt" fo:border="none"/>
      <style:text-properties/>
    </style:style>
    <style:style style:family="text" style:name="T949">
      <style:text-properties fo:color="#1f1f1f" fo:font-family="Arial" style:font-family-asian="Arial" style:font-family-complex="Arial" fo:font-size="12pt"/>
    </style:style>
    <style:style style:parent-style-name="950" style:family="paragraph" style:name="P2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50">
      <style:text-properties fo:color="#1f1f1f" fo:font-family="Arial" style:font-family-asian="Arial" style:font-family-complex="Arial" fo:font-size="12pt" fo:font-weight="bold"/>
    </style:style>
    <style:style style:family="paragraph" style:name="P246">
      <style:paragraph-properties fo:line-height="115%" fo:margin-left="0cm" fo:margin-right="0cm" fo:text-indent="0cm" fo:margin-top="0pt" fo:margin-bottom="0pt" fo:border="none"/>
      <style:text-properties/>
    </style:style>
    <style:style style:family="text" style:name="T951">
      <style:text-properties fo:color="#1f1f1f" fo:font-family="Arial" style:font-family-asian="Arial" style:font-family-complex="Arial" fo:font-size="12pt"/>
    </style:style>
    <style:style style:family="text" style:name="T952">
      <style:text-properties fo:color="#1f1f1f" fo:font-family="Arial" style:font-family-asian="Arial" style:font-family-complex="Arial" fo:font-size="12pt"/>
    </style:style>
    <style:style style:parent-style-name="950" style:family="paragraph" style:name="P2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53">
      <style:text-properties fo:color="#1f1f1f" fo:font-family="Arial" style:font-family-asian="Arial" style:font-family-complex="Arial" fo:font-size="12pt" fo:font-weight="bold"/>
    </style:style>
    <style:style style:family="paragraph" style:name="P248">
      <style:paragraph-properties fo:line-height="115%" fo:margin-left="0cm" fo:margin-right="0cm" fo:text-indent="0cm" fo:margin-top="0pt" fo:margin-bottom="0pt" fo:border="none"/>
      <style:text-properties/>
    </style:style>
    <style:style style:family="text" style:name="T954">
      <style:text-properties fo:color="#1f1f1f" fo:font-family="Arial" style:font-family-asian="Arial" style:font-family-complex="Arial" fo:font-size="12pt"/>
    </style:style>
    <style:style style:family="text" style:name="T955">
      <style:text-properties fo:color="#1f1f1f" fo:font-family="Arial" style:font-family-asian="Arial" style:font-family-complex="Arial" fo:font-size="12pt"/>
    </style:style>
    <style:style style:parent-style-name="950" style:family="paragraph" style:name="P24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56">
      <style:text-properties fo:color="#1f1f1f" fo:font-family="Arial" style:font-family-asian="Arial" style:font-family-complex="Arial" fo:font-size="12pt" fo:font-weight="bold"/>
    </style:style>
    <style:style style:family="paragraph" style:name="P250">
      <style:paragraph-properties fo:line-height="115%" fo:margin-left="0cm" fo:margin-right="0cm" fo:text-indent="0cm" fo:margin-top="0pt" fo:margin-bottom="0pt" fo:border="none"/>
      <style:text-properties/>
    </style:style>
    <style:style style:family="text" style:name="T957">
      <style:text-properties fo:color="#1f1f1f" fo:font-family="Arial" style:font-family-asian="Arial" style:font-family-complex="Arial" fo:font-size="12pt"/>
    </style:style>
    <style:style style:parent-style-name="950" style:family="paragraph" style:name="P25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58">
      <style:text-properties fo:color="#1f1f1f" fo:font-family="Arial" style:font-family-asian="Arial" style:font-family-complex="Arial" fo:font-size="12pt" fo:font-weight="bold"/>
    </style:style>
    <style:style style:family="paragraph" style:name="P252">
      <style:paragraph-properties fo:line-height="115%" fo:margin-left="0cm" fo:margin-right="0cm" fo:text-indent="0cm" fo:margin-top="0pt" fo:margin-bottom="0pt" fo:border="none"/>
      <style:text-properties/>
    </style:style>
    <style:style style:family="text" style:name="T959">
      <style:text-properties fo:color="#1f1f1f" fo:font-family="Arial" style:font-family-asian="Arial" style:font-family-complex="Arial" fo:font-size="12pt"/>
    </style:style>
    <style:style style:parent-style-name="949" style:family="paragraph" style:name="P25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60">
      <style:text-properties fo:color="#1f1f1f" fo:font-family="Arial" style:font-family-asian="Arial" style:font-family-complex="Arial" fo:font-size="14pt" fo:font-weight="bold"/>
    </style:style>
    <style:style style:parent-style-name="1010" style:list-style-name="WWNum23" style:family="paragraph" style:name="P254">
      <style:paragraph-properties fo:line-height="115%" fo:margin-right="0cm" fo:margin-top="0pt" fo:margin-bottom="0pt" fo:border="none"/>
      <style:text-properties/>
    </style:style>
    <style:style style:family="text" style:name="T961">
      <style:text-properties fo:color="#1f1f1f" fo:font-family="Arial" style:font-family-asian="Arial" style:font-family-complex="Arial" fo:font-size="12pt"/>
    </style:style>
    <style:style style:parent-style-name="1010" style:list-style-name="WWNum23" style:family="paragraph" style:name="P255">
      <style:paragraph-properties fo:line-height="115%" fo:margin-right="0cm" fo:margin-top="0pt" fo:margin-bottom="0pt" fo:border="none"/>
      <style:text-properties/>
    </style:style>
    <style:style style:family="text" style:name="T962">
      <style:text-properties fo:color="#1f1f1f" fo:font-family="Arial" style:font-family-asian="Arial" style:font-family-complex="Arial" fo:font-size="12pt"/>
    </style:style>
    <style:style style:parent-style-name="1010" style:list-style-name="WWNum23" style:family="paragraph" style:name="P256">
      <style:paragraph-properties fo:line-height="115%" fo:margin-right="0cm" fo:margin-top="0pt" fo:margin-bottom="0pt" fo:border="none"/>
      <style:text-properties/>
    </style:style>
    <style:style style:family="text" style:name="T963">
      <style:text-properties fo:color="#1f1f1f" fo:font-family="Arial" style:font-family-asian="Arial" style:font-family-complex="Arial" fo:font-size="12pt"/>
    </style:style>
    <style:style style:parent-style-name="1010" style:list-style-name="WWNum23" style:family="paragraph" style:name="P257">
      <style:paragraph-properties fo:line-height="115%" fo:margin-right="0cm" fo:margin-top="0pt" fo:margin-bottom="0pt" fo:border="none"/>
      <style:text-properties/>
    </style:style>
    <style:style style:family="text" style:name="T964">
      <style:text-properties fo:color="#1f1f1f" fo:font-family="Arial" style:font-family-asian="Arial" style:font-family-complex="Arial" fo:font-size="12pt"/>
    </style:style>
    <style:style style:family="paragraph" style:name="P258">
      <style:paragraph-properties/>
      <style:text-properties/>
    </style:style>
    <style:style style:parent-style-name="949" style:family="paragraph" style:name="P25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65">
      <style:text-properties fo:color="#1f1f1f" fo:font-family="Arial" style:font-family-asian="Arial" style:font-family-complex="Arial" fo:font-size="14pt" fo:font-weight="bold"/>
    </style:style>
    <style:style style:family="paragraph" style:name="P260">
      <style:paragraph-properties fo:line-height="115%" fo:margin-left="0cm" fo:margin-right="0cm" fo:text-indent="0cm" fo:margin-top="0pt" fo:margin-bottom="0pt" fo:border="none"/>
      <style:text-properties/>
    </style:style>
    <style:style style:family="text" style:name="T966">
      <style:text-properties fo:color="#1f1f1f" fo:font-family="Arial" style:font-family-asian="Arial" style:font-family-complex="Arial" fo:font-size="12pt"/>
    </style:style>
    <style:style style:parent-style-name="950" style:family="paragraph" style:name="P26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67">
      <style:text-properties fo:color="#1f1f1f" fo:font-family="Arial" style:font-family-asian="Arial" style:font-family-complex="Arial" fo:font-size="12pt" fo:font-weight="bold"/>
    </style:style>
    <style:style style:family="paragraph" style:name="P262">
      <style:paragraph-properties fo:line-height="115%" fo:margin-left="0cm" fo:margin-right="0cm" fo:text-indent="0cm" fo:margin-top="0pt" fo:margin-bottom="0pt" fo:border="none"/>
      <style:text-properties/>
    </style:style>
    <style:style style:family="text" style:name="T968">
      <style:text-properties fo:color="#1f1f1f" fo:font-family="Arial" style:font-family-asian="Arial" style:font-family-complex="Arial" fo:font-size="12pt"/>
    </style:style>
    <style:style style:parent-style-name="950" style:family="paragraph" style:name="P26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69">
      <style:text-properties fo:color="#1f1f1f" fo:font-family="Arial" style:font-family-asian="Arial" style:font-family-complex="Arial" fo:font-size="12pt" fo:font-weight="bold"/>
    </style:style>
    <style:style style:family="paragraph" style:name="P264">
      <style:paragraph-properties fo:line-height="115%" fo:margin-left="0cm" fo:margin-right="0cm" fo:text-indent="0cm" fo:margin-top="0pt" fo:margin-bottom="0pt" fo:border="none"/>
      <style:text-properties/>
    </style:style>
    <style:style style:family="text" style:name="T970">
      <style:text-properties fo:color="#1f1f1f" fo:font-family="Arial" style:font-family-asian="Arial" style:font-family-complex="Arial" fo:font-size="12pt"/>
    </style:style>
    <style:style style:parent-style-name="950" style:family="paragraph" style:name="P26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1">
      <style:text-properties fo:color="#1f1f1f" fo:font-family="Arial" style:font-family-asian="Arial" style:font-family-complex="Arial" fo:font-size="12pt" fo:font-weight="bold"/>
    </style:style>
    <style:style style:family="paragraph" style:name="P266">
      <style:paragraph-properties fo:line-height="115%" fo:margin-left="0cm" fo:margin-right="0cm" fo:text-indent="0cm" fo:margin-top="0pt" fo:margin-bottom="0pt" fo:border="none"/>
      <style:text-properties/>
    </style:style>
    <style:style style:family="text" style:name="T972">
      <style:text-properties fo:color="#1f1f1f" fo:font-family="Arial" style:font-family-asian="Arial" style:font-family-complex="Arial" fo:font-size="12pt"/>
    </style:style>
    <style:style style:parent-style-name="950" style:family="paragraph" style:name="P26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3">
      <style:text-properties fo:color="#1f1f1f" fo:font-family="Arial" style:font-family-asian="Arial" style:font-family-complex="Arial" fo:font-size="12pt" fo:font-weight="bold"/>
    </style:style>
    <style:style style:family="paragraph" style:name="P268">
      <style:paragraph-properties fo:line-height="115%" fo:margin-left="0cm" fo:margin-right="0cm" fo:text-indent="0cm" fo:margin-top="0pt" fo:margin-bottom="0pt" fo:border="none"/>
      <style:text-properties/>
    </style:style>
    <style:style style:family="text" style:name="T974">
      <style:text-properties fo:color="#1f1f1f" fo:font-family="Arial" style:font-family-asian="Arial" style:font-family-complex="Arial" fo:font-size="12pt"/>
    </style:style>
    <style:style style:family="table" style:name="ta2">
      <style:paragraph-properties fo:line-height="100%" fo:margin-bottom="0pt"/>
      <style:table-properties style:width="10.31cm" fo:margin-left="0cm" table:align="left" style:use-optimal-column-width="true"/>
    </style:style>
    <style:style style:family="table-column" style:name="co4">
      <style:table-column-properties style:column-width="1.3cm" style:use-optimal-column-width="true"/>
    </style:style>
    <style:style style:family="table-column" style:name="co5">
      <style:table-column-properties style:column-width="4.348cm" style:use-optimal-column-width="true"/>
    </style:style>
    <style:style style:family="table-column" style:name="co6">
      <style:table-column-properties style:column-width="4.66cm" style:use-optimal-column-width="true"/>
    </style:style>
    <style:style style:family="table-row" style:name="ro4">
      <style:table-row-properties/>
    </style:style>
    <style:style style:family="table-cell" style:name="ce1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69">
      <style:paragraph-properties fo:line-height="100%" fo:margin-top="0pt" fo:margin-bottom="0pt"/>
      <style:text-properties/>
    </style:style>
    <style:style style:family="text" style:name="T975">
      <style:text-properties fo:color="#1f1f1f" fo:font-family="Arial" style:font-family-asian="Arial" style:font-family-complex="Arial" fo:font-size="12pt" fo:font-weight="bold"/>
    </style:style>
    <style:style style:family="table-cell" style:name="ce1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0">
      <style:paragraph-properties fo:line-height="100%" fo:margin-top="0pt" fo:margin-bottom="0pt"/>
      <style:text-properties/>
    </style:style>
    <style:style style:family="text" style:name="T976">
      <style:text-properties fo:color="#1f1f1f" fo:font-family="Arial" style:font-family-asian="Arial" style:font-family-complex="Arial" fo:font-size="12pt" fo:font-weight="bold"/>
    </style:style>
    <style:style style:family="table-cell" style:name="ce1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1">
      <style:paragraph-properties fo:line-height="100%" fo:margin-top="0pt" fo:margin-bottom="0pt"/>
      <style:text-properties/>
    </style:style>
    <style:style style:family="text" style:name="T977">
      <style:text-properties fo:color="#1f1f1f" fo:font-family="Arial" style:font-family-asian="Arial" style:font-family-complex="Arial" fo:font-size="12pt" fo:font-weight="bold"/>
    </style:style>
    <style:style style:family="table-row" style:name="ro5">
      <style:table-row-properties/>
    </style:style>
    <style:style style:family="table-cell" style:name="ce1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2">
      <style:paragraph-properties fo:line-height="100%" fo:margin-top="0pt" fo:margin-bottom="0pt"/>
      <style:text-properties/>
    </style:style>
    <style:style style:family="text" style:name="T978">
      <style:text-properties fo:color="#1f1f1f" fo:font-family="Arial" style:font-family-asian="Arial" style:font-family-complex="Arial" fo:font-size="12pt"/>
    </style:style>
    <style:style style:family="table-cell" style:name="ce1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3">
      <style:paragraph-properties fo:line-height="100%" fo:margin-top="0pt" fo:margin-bottom="0pt"/>
      <style:text-properties/>
    </style:style>
    <style:style style:family="text" style:name="T979">
      <style:text-properties fo:color="#1f1f1f" fo:font-family="Arial" style:font-family-asian="Arial" style:font-family-complex="Arial" fo:font-size="12pt"/>
    </style:style>
    <style:style style:family="table-cell" style:name="ce1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4">
      <style:paragraph-properties fo:line-height="100%" fo:margin-top="0pt" fo:margin-bottom="0pt"/>
      <style:text-properties/>
    </style:style>
    <style:style style:family="text" style:name="T980">
      <style:text-properties fo:color="#1f1f1f" fo:font-family="Arial" style:font-family-asian="Arial" style:font-family-complex="Arial" fo:font-size="12pt"/>
    </style:style>
    <style:style style:family="table-row" style:name="ro6">
      <style:table-row-properties/>
    </style:style>
    <style:style style:family="table-cell" style:name="ce1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5">
      <style:paragraph-properties fo:line-height="100%" fo:margin-top="0pt" fo:margin-bottom="0pt"/>
      <style:text-properties/>
    </style:style>
    <style:style style:family="text" style:name="T981">
      <style:text-properties fo:color="#1f1f1f" fo:font-family="Arial" style:font-family-asian="Arial" style:font-family-complex="Arial" fo:font-size="12pt"/>
    </style:style>
    <style:style style:family="table-cell" style:name="ce1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6">
      <style:paragraph-properties fo:line-height="100%" fo:margin-top="0pt" fo:margin-bottom="0pt"/>
      <style:text-properties/>
    </style:style>
    <style:style style:family="text" style:name="T982">
      <style:text-properties fo:color="#1f1f1f" fo:font-family="Arial" style:font-family-asian="Arial" style:font-family-complex="Arial" fo:font-size="12pt"/>
    </style:style>
    <style:style style:family="table-cell" style:name="ce2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77">
      <style:paragraph-properties fo:line-height="100%" fo:margin-top="0pt" fo:margin-bottom="0pt"/>
      <style:text-properties/>
    </style:style>
    <style:style style:family="text" style:name="T983">
      <style:text-properties fo:color="#1f1f1f" fo:font-family="Arial" style:font-family-asian="Arial" style:font-family-complex="Arial" fo:font-size="12pt"/>
    </style:style>
    <style:style style:parent-style-name="949" style:family="paragraph" style:name="P2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84">
      <style:text-properties fo:color="#1f1f1f" fo:font-family="Arial" style:font-family-asian="Arial" style:font-family-complex="Arial" fo:font-size="14pt" fo:font-weight="bold"/>
    </style:style>
    <style:style style:parent-style-name="1010" style:list-style-name="WWNum24" style:family="paragraph" style:name="P279">
      <style:paragraph-properties fo:line-height="115%" fo:margin-right="0cm" fo:margin-top="0pt" fo:margin-bottom="0pt" fo:border="none"/>
      <style:text-properties/>
    </style:style>
    <style:style style:family="text" style:name="T985">
      <style:text-properties fo:color="#1f1f1f" fo:font-family="Arial" style:font-family-asian="Arial" style:font-family-complex="Arial" fo:font-size="12pt"/>
    </style:style>
    <style:style style:parent-style-name="1010" style:list-style-name="WWNum24" style:family="paragraph" style:name="P280">
      <style:paragraph-properties fo:line-height="115%" fo:margin-right="0cm" fo:margin-top="0pt" fo:margin-bottom="0pt" fo:border="none"/>
      <style:text-properties/>
    </style:style>
    <style:style style:family="text" style:name="T986">
      <style:text-properties fo:color="#1f1f1f" fo:font-family="Arial" style:font-family-asian="Arial" style:font-family-complex="Arial" fo:font-size="12pt"/>
    </style:style>
    <style:style style:parent-style-name="1010" style:list-style-name="WWNum24" style:family="paragraph" style:name="P281">
      <style:paragraph-properties fo:line-height="115%" fo:margin-right="0cm" fo:margin-top="0pt" fo:margin-bottom="0pt" fo:border="none"/>
      <style:text-properties/>
    </style:style>
    <style:style style:family="text" style:name="T987">
      <style:text-properties fo:color="#1f1f1f" fo:font-family="Arial" style:font-family-asian="Arial" style:font-family-complex="Arial" fo:font-size="12pt"/>
    </style:style>
    <style:style style:parent-style-name="1010" style:list-style-name="WWNum24" style:family="paragraph" style:name="P282">
      <style:paragraph-properties fo:line-height="115%" fo:margin-right="0cm" fo:margin-top="0pt" fo:margin-bottom="0pt" fo:border="none"/>
      <style:text-properties/>
    </style:style>
    <style:style style:family="text" style:name="T988">
      <style:text-properties fo:color="#1f1f1f" fo:font-family="Arial" style:font-family-asian="Arial" style:font-family-complex="Arial" fo:font-size="12pt"/>
    </style:style>
    <style:style style:family="paragraph" style:name="P283">
      <style:paragraph-properties/>
      <style:text-properties/>
    </style:style>
    <style:style style:family="paragraph" style:name="P284">
      <style:paragraph-properties fo:line-height="115%" fo:margin-left="0cm" fo:margin-right="0cm" fo:text-indent="0cm" fo:margin-top="0pt" fo:margin-bottom="0pt" fo:break-before="page" fo:border="none"/>
      <style:text-properties/>
    </style:style>
    <style:style style:family="text" style:name="T989">
      <style:text-properties fo:color="#1f1f1f" fo:font-family="Arial" style:font-family-asian="Arial" style:font-family-complex="Arial" fo:font-size="12pt"/>
    </style:style>
    <style:style style:parent-style-name="949" style:family="paragraph" style:name="P28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90">
      <style:text-properties fo:color="#1f1f1f" fo:font-family="Arial" style:font-family-asian="Arial" style:font-family-complex="Arial" fo:font-size="14pt" fo:font-weight="bold"/>
    </style:style>
    <style:style style:family="paragraph" style:name="P286">
      <style:paragraph-properties fo:line-height="115%" fo:margin-left="0cm" fo:margin-right="0cm" fo:text-indent="0cm" fo:margin-top="0pt" fo:margin-bottom="0pt" fo:border="none"/>
      <style:text-properties/>
    </style:style>
    <style:style style:family="text" style:name="T991">
      <style:text-properties fo:color="#1f1f1f" fo:font-family="Arial" style:font-family-asian="Arial" style:font-family-complex="Arial" fo:font-size="12pt"/>
    </style:style>
    <style:style style:parent-style-name="950" style:family="paragraph" style:name="P28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2">
      <style:text-properties fo:color="#1f1f1f" fo:font-family="Arial" style:font-family-asian="Arial" style:font-family-complex="Arial" fo:font-size="12pt" fo:font-weight="bold"/>
    </style:style>
    <style:style style:family="paragraph" style:name="P288">
      <style:paragraph-properties fo:line-height="115%" fo:margin-left="0cm" fo:margin-right="0cm" fo:text-indent="0cm" fo:margin-top="0pt" fo:margin-bottom="0pt" fo:border="none"/>
      <style:text-properties/>
    </style:style>
    <style:style style:family="text" style:name="T993">
      <style:text-properties fo:color="#1f1f1f" fo:font-family="Arial" style:font-family-asian="Arial" style:font-family-complex="Arial" fo:font-size="12pt"/>
    </style:style>
    <style:style style:parent-style-name="950" style:family="paragraph" style:name="P2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4">
      <style:text-properties fo:color="#1f1f1f" fo:font-family="Arial" style:font-family-asian="Arial" style:font-family-complex="Arial" fo:font-size="12pt" fo:font-weight="bold"/>
    </style:style>
    <style:style style:parent-style-name="1010" style:list-style-name="WWNum25" style:family="paragraph" style:name="P290">
      <style:paragraph-properties fo:line-height="115%" fo:margin-right="0cm" fo:margin-top="0pt" fo:margin-bottom="0pt" fo:border="none"/>
      <style:text-properties/>
    </style:style>
    <style:style style:family="text" style:name="T995">
      <style:text-properties fo:color="#1f1f1f" fo:font-family="Arial" style:font-family-asian="Arial" style:font-family-complex="Arial" fo:font-size="12pt"/>
    </style:style>
    <style:style style:parent-style-name="1010" style:list-style-name="WWNum25" style:family="paragraph" style:name="P291">
      <style:paragraph-properties fo:line-height="115%" fo:margin-right="0cm" fo:margin-top="0pt" fo:margin-bottom="0pt" fo:border="none"/>
      <style:text-properties/>
    </style:style>
    <style:style style:family="text" style:name="T996">
      <style:text-properties fo:color="#1f1f1f" fo:font-family="Arial" style:font-family-asian="Arial" style:font-family-complex="Arial" fo:font-size="12pt"/>
    </style:style>
    <style:style style:parent-style-name="1010" style:list-style-name="WWNum25" style:family="paragraph" style:name="P292">
      <style:paragraph-properties fo:line-height="115%" fo:margin-right="0cm" fo:margin-top="0pt" fo:margin-bottom="0pt" fo:border="none"/>
      <style:text-properties/>
    </style:style>
    <style:style style:family="text" style:name="T997">
      <style:text-properties fo:color="#1f1f1f" fo:font-family="Arial" style:font-family-asian="Arial" style:font-family-complex="Arial" fo:font-size="12pt"/>
    </style:style>
    <style:style style:parent-style-name="950" style:family="paragraph" style:name="P2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8">
      <style:text-properties fo:color="#1f1f1f" fo:font-family="Arial" style:font-family-asian="Arial" style:font-family-complex="Arial" fo:font-size="12pt" fo:font-weight="bold"/>
    </style:style>
    <style:style style:family="table" style:name="ta3">
      <style:paragraph-properties fo:line-height="100%" fo:margin-bottom="0pt"/>
      <style:table-properties style:width="12.1cm" fo:margin-left="0cm" table:align="left" style:use-optimal-column-width="true"/>
    </style:style>
    <style:style style:family="table-column" style:name="co7">
      <style:table-column-properties style:column-width="1.981cm" style:use-optimal-column-width="true"/>
    </style:style>
    <style:style style:family="table-column" style:name="co8">
      <style:table-column-properties style:column-width="10.12cm" style:use-optimal-column-width="true"/>
    </style:style>
    <style:style style:family="table-row" style:name="ro7">
      <style:table-row-properties/>
    </style:style>
    <style:style style:family="table-cell" style:name="ce2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4">
      <style:paragraph-properties fo:line-height="100%" fo:margin-top="0pt" fo:margin-bottom="0pt"/>
      <style:text-properties/>
    </style:style>
    <style:style style:family="text" style:name="T999">
      <style:text-properties fo:color="#1f1f1f" fo:font-family="Arial" style:font-family-asian="Arial" style:font-family-complex="Arial" fo:font-size="12pt" fo:font-weight="bold"/>
    </style:style>
    <style:style style:family="table-cell" style:name="ce2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5">
      <style:paragraph-properties fo:line-height="100%" fo:margin-top="0pt" fo:margin-bottom="0pt"/>
      <style:text-properties/>
    </style:style>
    <style:style style:family="text" style:name="T1000">
      <style:text-properties fo:color="#1f1f1f" fo:font-family="Arial" style:font-family-asian="Arial" style:font-family-complex="Arial" fo:font-size="12pt" fo:font-weight="bold"/>
    </style:style>
    <style:style style:family="table-row" style:name="ro8">
      <style:table-row-properties/>
    </style:style>
    <style:style style:family="table-cell" style:name="ce2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6">
      <style:paragraph-properties fo:line-height="100%" fo:margin-top="0pt" fo:margin-bottom="0pt"/>
      <style:text-properties/>
    </style:style>
    <style:style style:family="text" style:name="T1001">
      <style:text-properties fo:color="#1f1f1f" fo:font-family="Arial" style:font-family-asian="Arial" style:font-family-complex="Arial" fo:font-size="12pt"/>
    </style:style>
    <style:style style:family="table-cell" style:name="ce2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7">
      <style:paragraph-properties fo:line-height="100%" fo:margin-top="0pt" fo:margin-bottom="0pt"/>
      <style:text-properties/>
    </style:style>
    <style:style style:family="text" style:name="T1002">
      <style:text-properties fo:color="#1f1f1f" fo:font-family="Arial" style:font-family-asian="Arial" style:font-family-complex="Arial" fo:font-size="12pt"/>
    </style:style>
    <style:style style:family="table-row" style:name="ro9">
      <style:table-row-properties/>
    </style:style>
    <style:style style:family="table-cell" style:name="ce2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8">
      <style:paragraph-properties fo:line-height="100%" fo:margin-top="0pt" fo:margin-bottom="0pt"/>
      <style:text-properties/>
    </style:style>
    <style:style style:family="text" style:name="T1003">
      <style:text-properties fo:color="#1f1f1f" fo:font-family="Arial" style:font-family-asian="Arial" style:font-family-complex="Arial" fo:font-size="12pt"/>
    </style:style>
    <style:style style:family="table-cell" style:name="ce2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299">
      <style:paragraph-properties fo:line-height="100%" fo:margin-top="0pt" fo:margin-bottom="0pt"/>
      <style:text-properties/>
    </style:style>
    <style:style style:family="text" style:name="T1004">
      <style:text-properties fo:color="#1f1f1f" fo:font-family="Arial" style:font-family-asian="Arial" style:font-family-complex="Arial" fo:font-size="12pt"/>
    </style:style>
    <style:style style:family="table-row" style:name="ro10">
      <style:table-row-properties/>
    </style:style>
    <style:style style:family="table-cell" style:name="ce2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00">
      <style:paragraph-properties fo:line-height="100%" fo:margin-top="0pt" fo:margin-bottom="0pt"/>
      <style:text-properties/>
    </style:style>
    <style:style style:family="text" style:name="T1005">
      <style:text-properties fo:color="#1f1f1f" fo:font-family="Arial" style:font-family-asian="Arial" style:font-family-complex="Arial" fo:font-size="12pt"/>
    </style:style>
    <style:style style:family="table-cell" style:name="ce2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301">
      <style:paragraph-properties fo:line-height="100%" fo:margin-top="0pt" fo:margin-bottom="0pt"/>
      <style:text-properties/>
    </style:style>
    <style:style style:family="text" style:name="T1006">
      <style:text-properties fo:color="#1f1f1f" fo:font-family="Arial" style:font-family-asian="Arial" style:font-family-complex="Arial" fo:font-size="12pt"/>
    </style:style>
    <style:style style:parent-style-name="950" style:family="paragraph" style:name="P30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07">
      <style:text-properties fo:color="#1f1f1f" fo:font-family="Arial" style:font-family-asian="Arial" style:font-family-complex="Arial" fo:font-size="12pt" fo:font-weight="bold"/>
    </style:style>
    <style:style style:family="paragraph" style:name="P303">
      <style:paragraph-properties fo:line-height="115%" fo:margin-left="0cm" fo:margin-right="0cm" fo:text-indent="0cm" fo:margin-top="0pt" fo:margin-bottom="0pt" fo:border="none"/>
      <style:text-properties/>
    </style:style>
    <style:style style:family="text" style:name="T1008">
      <style:text-properties fo:color="#1f1f1f" fo:font-family="Arial" style:font-family-asian="Arial" style:font-family-complex="Arial" fo:font-size="12pt"/>
    </style:style>
    <style:style style:parent-style-name="949" style:family="paragraph" style:name="P30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09">
      <style:text-properties fo:color="#1f1f1f" fo:font-family="Arial" style:font-family-asian="Arial" style:font-family-complex="Arial" fo:font-size="14pt" fo:font-weight="bold"/>
    </style:style>
    <style:style style:parent-style-name="1010" style:list-style-name="WWNum25" style:family="paragraph" style:name="P305">
      <style:paragraph-properties fo:line-height="115%" fo:margin-right="0cm" fo:margin-top="0pt" fo:margin-bottom="0pt" fo:border="none"/>
      <style:text-properties/>
    </style:style>
    <style:style style:family="text" style:name="T1010">
      <style:text-properties fo:color="#1f1f1f" fo:font-family="Arial" style:font-family-asian="Arial" style:font-family-complex="Arial" fo:font-size="12pt"/>
    </style:style>
    <style:style style:parent-style-name="1010" style:list-style-name="WWNum25" style:family="paragraph" style:name="P306">
      <style:paragraph-properties fo:line-height="115%" fo:margin-right="0cm" fo:margin-top="0pt" fo:margin-bottom="0pt" fo:border="none"/>
      <style:text-properties/>
    </style:style>
    <style:style style:family="text" style:name="T1011">
      <style:text-properties fo:color="#1f1f1f" fo:font-family="Arial" style:font-family-asian="Arial" style:font-family-complex="Arial" fo:font-size="12pt"/>
    </style:style>
    <style:style style:parent-style-name="1010" style:list-style-name="WWNum25" style:family="paragraph" style:name="P307">
      <style:paragraph-properties fo:line-height="115%" fo:margin-right="0cm" fo:margin-top="0pt" fo:margin-bottom="0pt" fo:border="none"/>
      <style:text-properties/>
    </style:style>
    <style:style style:family="text" style:name="T1012">
      <style:text-properties fo:color="#1f1f1f" fo:font-family="Arial" style:font-family-asian="Arial" style:font-family-complex="Arial" fo:font-size="12pt"/>
    </style:style>
    <style:style style:parent-style-name="1010" style:list-style-name="WWNum25" style:family="paragraph" style:name="P308">
      <style:paragraph-properties fo:line-height="115%" fo:margin-right="0cm" fo:margin-top="0pt" fo:margin-bottom="0pt" fo:border="none"/>
      <style:text-properties/>
    </style:style>
    <style:style style:family="text" style:name="T1013">
      <style:text-properties fo:color="#1f1f1f" fo:font-family="Arial" style:font-family-asian="Arial" style:font-family-complex="Arial" fo:font-size="12pt"/>
    </style:style>
    <style:style style:family="paragraph" style:name="P309">
      <style:paragraph-properties/>
      <style:text-properties/>
    </style:style>
    <style:style style:family="paragraph" style:name="P310">
      <style:paragraph-properties fo:line-height="115%" fo:margin-left="0cm" fo:margin-right="0cm" fo:text-indent="0cm" fo:margin-top="0pt" fo:margin-bottom="0pt" fo:break-before="page" fo:border="none"/>
      <style:text-properties/>
    </style:style>
    <style:style style:family="text" style:name="T1014">
      <style:text-properties fo:color="#1f1f1f" fo:font-family="Arial" style:font-family-asian="Arial" style:font-family-complex="Arial" fo:font-size="12pt"/>
    </style:style>
    <style:style style:parent-style-name="949" style:family="paragraph" style:name="P31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15">
      <style:text-properties fo:color="#1f1f1f" fo:font-family="Arial" style:font-family-asian="Arial" style:font-family-complex="Arial" fo:font-size="14pt" fo:font-weight="bold"/>
    </style:style>
    <style:style style:family="paragraph" style:name="P312">
      <style:paragraph-properties fo:line-height="115%" fo:margin-left="0cm" fo:margin-right="0cm" fo:text-indent="0cm" fo:margin-top="0pt" fo:margin-bottom="0pt" fo:border="none"/>
      <style:text-properties/>
    </style:style>
    <style:style style:family="text" style:name="T1016">
      <style:text-properties fo:color="#1f1f1f" fo:font-family="Arial" style:font-family-asian="Arial" style:font-family-complex="Arial" fo:font-size="12pt"/>
    </style:style>
    <style:style style:parent-style-name="950" style:family="paragraph" style:name="P31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17">
      <style:text-properties fo:color="#1f1f1f" fo:font-family="Arial" style:font-family-asian="Arial" style:font-family-complex="Arial" fo:font-size="12pt" fo:font-weight="bold"/>
    </style:style>
    <style:style style:family="paragraph" style:name="P314">
      <style:paragraph-properties fo:line-height="115%" fo:margin-left="0cm" fo:margin-right="0cm" fo:text-indent="0cm" fo:margin-top="0pt" fo:margin-bottom="0pt" fo:border="none"/>
      <style:text-properties/>
    </style:style>
    <style:style style:family="text" style:name="T1018">
      <style:text-properties fo:color="#1f1f1f" fo:font-family="Arial" style:font-family-asian="Arial" style:font-family-complex="Arial" fo:font-size="12pt"/>
    </style:style>
    <style:style style:parent-style-name="950" style:family="paragraph" style:name="P31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19">
      <style:text-properties fo:color="#1f1f1f" fo:font-family="Arial" style:font-family-asian="Arial" style:font-family-complex="Arial" fo:font-size="12pt" fo:font-weight="bold"/>
    </style:style>
    <style:style style:family="paragraph" style:name="P316">
      <style:paragraph-properties fo:line-height="115%" fo:margin-left="0cm" fo:margin-right="0cm" fo:text-indent="0cm" fo:margin-top="0pt" fo:margin-bottom="0pt" fo:border="none"/>
      <style:text-properties/>
    </style:style>
    <style:style style:family="text" style:name="T1020">
      <style:text-properties fo:color="#1f1f1f" fo:font-family="Arial" style:font-family-asian="Arial" style:font-family-complex="Arial" fo:font-size="12pt"/>
    </style:style>
    <style:style style:family="paragraph" style:name="P317">
      <style:paragraph-properties fo:line-height="115%" fo:margin-left="0cm" fo:margin-right="0cm" fo:text-indent="0cm" fo:margin-top="0pt" fo:margin-bottom="0pt" fo:border="none"/>
      <style:text-properties/>
    </style:style>
    <style:style style:family="text" style:name="T1021">
      <style:text-properties fo:color="#1f1f1f" fo:font-family="Arial" style:font-family-asian="Arial" style:font-family-complex="Arial" fo:font-size="12pt" fo:font-weight="bold"/>
    </style:style>
    <style:style style:family="text" style:name="T1022">
      <style:text-properties fo:color="#1f1f1f" fo:font-family="Arial" style:font-family-asian="Arial" style:font-family-complex="Arial" fo:font-size="12pt"/>
    </style:style>
    <style:style style:parent-style-name="950" style:family="paragraph" style:name="P3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23">
      <style:text-properties fo:color="#1f1f1f" fo:font-family="Arial" style:font-family-asian="Arial" style:font-family-complex="Arial" fo:font-size="12pt" fo:font-weight="bold"/>
    </style:style>
    <style:style style:family="paragraph" style:name="P319">
      <style:paragraph-properties fo:line-height="115%" fo:margin-left="0cm" fo:margin-right="0cm" fo:text-indent="0cm" fo:margin-top="0pt" fo:margin-bottom="0pt" fo:border="none"/>
      <style:text-properties/>
    </style:style>
    <style:style style:family="text" style:name="T1024">
      <style:text-properties fo:color="#1f1f1f" fo:font-family="Arial" style:font-family-asian="Arial" style:font-family-complex="Arial" fo:font-size="12pt"/>
    </style:style>
    <style:style style:parent-style-name="950" style:family="paragraph" style:name="P32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25">
      <style:text-properties fo:color="#1f1f1f" fo:font-family="Arial" style:font-family-asian="Arial" style:font-family-complex="Arial" fo:font-size="12pt" fo:font-weight="bold"/>
    </style:style>
    <style:style style:family="paragraph" style:name="P321">
      <style:paragraph-properties fo:line-height="115%" fo:margin-left="0cm" fo:margin-right="0cm" fo:text-indent="0cm" fo:margin-top="0pt" fo:margin-bottom="0pt" fo:border="none"/>
      <style:text-properties/>
    </style:style>
    <style:style style:family="text" style:name="T1026">
      <style:text-properties fo:color="#1f1f1f" fo:font-family="Arial" style:font-family-asian="Arial" style:font-family-complex="Arial" fo:font-size="12pt"/>
    </style:style>
    <style:style style:parent-style-name="1010" style:list-style-name="WWNum26" style:family="paragraph" style:name="P322">
      <style:paragraph-properties fo:line-height="115%" fo:margin-right="0cm" fo:margin-top="0pt" fo:margin-bottom="0pt" fo:border="none"/>
      <style:text-properties/>
    </style:style>
    <style:style style:family="text" style:name="T1027">
      <style:text-properties fo:color="#1f1f1f" fo:font-family="Arial" style:font-family-asian="Arial" style:font-family-complex="Arial" fo:font-size="12pt" fo:font-weight="bold"/>
    </style:style>
    <style:style style:family="text" style:name="T1028">
      <style:text-properties fo:color="#1f1f1f" fo:font-family="Arial" style:font-family-asian="Arial" style:font-family-complex="Arial" fo:font-size="12pt"/>
    </style:style>
    <style:style style:parent-style-name="1010" style:list-style-name="WWNum26" style:family="paragraph" style:name="P323">
      <style:paragraph-properties fo:line-height="115%" fo:margin-right="0cm" fo:margin-top="0pt" fo:margin-bottom="0pt" fo:border="none"/>
      <style:text-properties/>
    </style:style>
    <style:style style:family="text" style:name="T1029">
      <style:text-properties fo:color="#1f1f1f" fo:font-family="Arial" style:font-family-asian="Arial" style:font-family-complex="Arial" fo:font-size="12pt" fo:font-weight="bold"/>
    </style:style>
    <style:style style:family="text" style:name="T1030">
      <style:text-properties fo:color="#1f1f1f" fo:font-family="Arial" style:font-family-asian="Arial" style:font-family-complex="Arial" fo:font-size="12pt"/>
    </style:style>
    <style:style style:parent-style-name="949" style:family="paragraph" style:name="P3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31">
      <style:text-properties fo:color="#1f1f1f" fo:font-family="Arial" style:font-family-asian="Arial" style:font-family-complex="Arial" fo:font-size="14pt" fo:font-weight="bold"/>
    </style:style>
    <style:style style:parent-style-name="1010" style:list-style-name="WWNum26" style:family="paragraph" style:name="P325">
      <style:paragraph-properties fo:line-height="115%" fo:margin-right="0cm" fo:margin-top="0pt" fo:margin-bottom="0pt" fo:border="none"/>
      <style:text-properties/>
    </style:style>
    <style:style style:family="text" style:name="T1032">
      <style:text-properties fo:color="#1f1f1f" fo:font-family="Arial" style:font-family-asian="Arial" style:font-family-complex="Arial" fo:font-size="12pt"/>
    </style:style>
    <style:style style:parent-style-name="1010" style:list-style-name="WWNum26" style:family="paragraph" style:name="P326">
      <style:paragraph-properties fo:line-height="115%" fo:margin-right="0cm" fo:margin-top="0pt" fo:margin-bottom="0pt" fo:border="none"/>
      <style:text-properties/>
    </style:style>
    <style:style style:family="text" style:name="T1033">
      <style:text-properties fo:color="#1f1f1f" fo:font-family="Arial" style:font-family-asian="Arial" style:font-family-complex="Arial" fo:font-size="12pt"/>
    </style:style>
    <style:style style:parent-style-name="1010" style:list-style-name="WWNum26" style:family="paragraph" style:name="P327">
      <style:paragraph-properties fo:line-height="115%" fo:margin-right="0cm" fo:margin-top="0pt" fo:margin-bottom="0pt" fo:border="none"/>
      <style:text-properties/>
    </style:style>
    <style:style style:family="text" style:name="T1034">
      <style:text-properties fo:color="#1f1f1f" fo:font-family="Arial" style:font-family-asian="Arial" style:font-family-complex="Arial" fo:font-size="12pt"/>
    </style:style>
    <style:style style:parent-style-name="1010" style:list-style-name="WWNum26" style:family="paragraph" style:name="P328">
      <style:paragraph-properties fo:line-height="115%" fo:margin-right="0cm" fo:margin-top="0pt" fo:margin-bottom="0pt" fo:border="none"/>
      <style:text-properties/>
    </style:style>
    <style:style style:family="text" style:name="T1035">
      <style:text-properties fo:color="#1f1f1f" fo:font-family="Arial" style:font-family-asian="Arial" style:font-family-complex="Arial" fo:font-size="12pt"/>
    </style:style>
    <style:style style:family="paragraph" style:name="P329">
      <style:paragraph-properties/>
      <style:text-properties/>
    </style:style>
    <style:style style:family="paragraph" style:name="P330">
      <style:paragraph-properties fo:line-height="115%" fo:margin-left="0cm" fo:margin-right="0cm" fo:text-indent="0cm" fo:margin-top="0pt" fo:margin-bottom="0pt" fo:break-before="page" fo:border="none"/>
      <style:text-properties/>
    </style:style>
    <style:style style:family="text" style:name="T1036">
      <style:text-properties fo:color="#1f1f1f" fo:font-family="Arial" style:font-family-asian="Arial" style:font-family-complex="Arial" fo:font-size="12pt"/>
    </style:style>
    <style:style style:parent-style-name="949" style:family="paragraph" style:name="P33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37">
      <style:text-properties fo:color="#1f1f1f" fo:font-family="Arial" style:font-family-asian="Arial" style:font-family-complex="Arial" fo:font-size="14pt" fo:font-weight="bold"/>
    </style:style>
    <style:style style:family="paragraph" style:name="P332">
      <style:paragraph-properties fo:line-height="115%" fo:margin-left="0cm" fo:margin-right="0cm" fo:text-indent="0cm" fo:margin-top="0pt" fo:margin-bottom="0pt" fo:border="none"/>
      <style:text-properties/>
    </style:style>
    <style:style style:family="text" style:name="T1038">
      <style:text-properties fo:color="#1f1f1f" fo:font-family="Arial" style:font-family-asian="Arial" style:font-family-complex="Arial" fo:font-size="12pt"/>
    </style:style>
    <style:style style:parent-style-name="950" style:family="paragraph" style:name="P3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39">
      <style:text-properties fo:color="#1f1f1f" fo:font-family="Arial" style:font-family-asian="Arial" style:font-family-complex="Arial" fo:font-size="12pt" fo:font-weight="bold"/>
    </style:style>
    <style:style style:family="paragraph" style:name="P334">
      <style:paragraph-properties fo:line-height="115%" fo:margin-left="0cm" fo:margin-right="0cm" fo:text-indent="0cm" fo:margin-top="0pt" fo:margin-bottom="0pt" fo:border="none"/>
      <style:text-properties/>
    </style:style>
    <style:style style:family="text" style:name="T1040">
      <style:text-properties fo:color="#1f1f1f" fo:font-family="Arial" style:font-family-asian="Arial" style:font-family-complex="Arial" fo:font-size="12pt"/>
    </style:style>
    <style:style style:parent-style-name="950" style:family="paragraph" style:name="P33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41">
      <style:text-properties fo:color="#1f1f1f" fo:font-family="Arial" style:font-family-asian="Arial" style:font-family-complex="Arial" fo:font-size="12pt" fo:font-weight="bold"/>
    </style:style>
    <style:style style:family="paragraph" style:name="P336">
      <style:paragraph-properties fo:line-height="115%" fo:margin-left="0cm" fo:margin-right="0cm" fo:text-indent="0cm" fo:margin-top="0pt" fo:margin-bottom="0pt" fo:border="none"/>
      <style:text-properties/>
    </style:style>
    <style:style style:family="text" style:name="T1042">
      <style:text-properties fo:color="#1f1f1f" fo:font-family="Arial" style:font-family-asian="Arial" style:font-family-complex="Arial" fo:font-size="12pt"/>
    </style:style>
    <style:style style:parent-style-name="950" style:family="paragraph" style:name="P3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43">
      <style:text-properties fo:color="#1f1f1f" fo:font-family="Arial" style:font-family-asian="Arial" style:font-family-complex="Arial" fo:font-size="12pt" fo:font-weight="bold"/>
    </style:style>
    <style:style style:family="paragraph" style:name="P338">
      <style:paragraph-properties fo:line-height="115%" fo:margin-left="0cm" fo:margin-right="0cm" fo:text-indent="0cm" fo:margin-top="0pt" fo:margin-bottom="0pt" fo:border="none"/>
      <style:text-properties/>
    </style:style>
    <style:style style:family="text" style:name="T1044">
      <style:text-properties fo:color="#1f1f1f" fo:font-family="Arial" style:font-family-asian="Arial" style:font-family-complex="Arial" fo:font-size="12pt"/>
    </style:style>
    <style:style style:parent-style-name="950" style:family="paragraph" style:name="P3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45">
      <style:text-properties fo:color="#1f1f1f" fo:font-family="Arial" style:font-family-asian="Arial" style:font-family-complex="Arial" fo:font-size="12pt" fo:font-weight="bold"/>
    </style:style>
    <style:style style:family="paragraph" style:name="P340">
      <style:paragraph-properties fo:line-height="115%" fo:margin-left="0cm" fo:margin-right="0cm" fo:text-indent="0cm" fo:margin-top="0pt" fo:margin-bottom="0pt" fo:border="none"/>
      <style:text-properties/>
    </style:style>
    <style:style style:family="text" style:name="T1046">
      <style:text-properties fo:color="#1f1f1f" fo:font-family="Arial" style:font-family-asian="Arial" style:font-family-complex="Arial" fo:font-size="12pt"/>
    </style:style>
    <style:style style:parent-style-name="949" style:family="paragraph" style:name="P3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47">
      <style:text-properties fo:color="#1f1f1f" fo:font-family="Arial" style:font-family-asian="Arial" style:font-family-complex="Arial" fo:font-size="14pt" fo:font-weight="bold"/>
    </style:style>
    <style:style style:parent-style-name="1010" style:list-style-name="WWNum27" style:family="paragraph" style:name="P342">
      <style:paragraph-properties fo:line-height="115%" fo:margin-right="0cm" fo:margin-top="0pt" fo:margin-bottom="0pt" fo:border="none"/>
      <style:text-properties/>
    </style:style>
    <style:style style:family="text" style:name="T1048">
      <style:text-properties fo:color="#1f1f1f" fo:font-family="Arial" style:font-family-asian="Arial" style:font-family-complex="Arial" fo:font-size="12pt"/>
    </style:style>
    <style:style style:parent-style-name="1010" style:list-style-name="WWNum27" style:family="paragraph" style:name="P343">
      <style:paragraph-properties fo:line-height="115%" fo:margin-right="0cm" fo:margin-top="0pt" fo:margin-bottom="0pt" fo:border="none"/>
      <style:text-properties/>
    </style:style>
    <style:style style:family="text" style:name="T1049">
      <style:text-properties fo:color="#1f1f1f" fo:font-family="Arial" style:font-family-asian="Arial" style:font-family-complex="Arial" fo:font-size="12pt"/>
    </style:style>
    <style:style style:parent-style-name="1010" style:list-style-name="WWNum27" style:family="paragraph" style:name="P344">
      <style:paragraph-properties fo:line-height="115%" fo:margin-right="0cm" fo:margin-top="0pt" fo:margin-bottom="0pt" fo:border="none"/>
      <style:text-properties/>
    </style:style>
    <style:style style:family="text" style:name="T1050">
      <style:text-properties fo:color="#1f1f1f" fo:font-family="Arial" style:font-family-asian="Arial" style:font-family-complex="Arial" fo:font-size="12pt"/>
    </style:style>
    <style:style style:parent-style-name="1010" style:list-style-name="WWNum27" style:family="paragraph" style:name="P345">
      <style:paragraph-properties fo:line-height="115%" fo:margin-right="0cm" fo:margin-top="0pt" fo:margin-bottom="0pt" fo:border="none"/>
      <style:text-properties/>
    </style:style>
    <style:style style:family="text" style:name="T1051">
      <style:text-properties fo:color="#1f1f1f" fo:font-family="Arial" style:font-family-asian="Arial" style:font-family-complex="Arial" fo:font-size="12pt"/>
    </style:style>
    <style:style style:family="paragraph" style:name="P346">
      <style:paragraph-properties/>
      <style:text-properties/>
    </style:style>
    <style:style style:family="paragraph" style:name="P347">
      <style:paragraph-properties fo:line-height="115%" fo:margin-left="0cm" fo:margin-right="0cm" fo:text-indent="0cm" fo:margin-top="0pt" fo:margin-bottom="0pt" fo:break-before="page" fo:border="none"/>
      <style:text-properties/>
    </style:style>
    <style:style style:family="text" style:name="T1052">
      <style:text-properties fo:color="#1f1f1f" fo:font-family="Arial" style:font-family-asian="Arial" style:font-family-complex="Arial" fo:font-size="12pt"/>
    </style:style>
    <style:style style:parent-style-name="949" style:family="paragraph" style:name="P34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53">
      <style:text-properties fo:color="#1f1f1f" fo:font-family="Arial" style:font-family-asian="Arial" style:font-family-complex="Arial" fo:font-size="14pt" fo:font-weight="bold"/>
    </style:style>
    <style:style style:family="paragraph" style:name="P349">
      <style:paragraph-properties fo:line-height="115%" fo:margin-left="0cm" fo:margin-right="0cm" fo:text-indent="0cm" fo:margin-top="0pt" fo:margin-bottom="0pt" fo:border="none"/>
      <style:text-properties/>
    </style:style>
    <style:style style:family="text" style:name="T1054">
      <style:text-properties fo:color="#1f1f1f" fo:font-family="Arial" style:font-family-asian="Arial" style:font-family-complex="Arial" fo:font-size="12pt"/>
    </style:style>
    <style:style style:parent-style-name="950" style:family="paragraph" style:name="P3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5">
      <style:text-properties fo:color="#1f1f1f" fo:font-family="Arial" style:font-family-asian="Arial" style:font-family-complex="Arial" fo:font-size="12pt" fo:font-weight="bold"/>
    </style:style>
    <style:style style:family="paragraph" style:name="P351">
      <style:paragraph-properties fo:line-height="115%" fo:margin-left="0cm" fo:margin-right="0cm" fo:text-indent="0cm" fo:margin-top="0pt" fo:margin-bottom="0pt" fo:border="none"/>
      <style:text-properties/>
    </style:style>
    <style:style style:family="text" style:name="T1056">
      <style:text-properties fo:color="#1f1f1f" fo:font-family="Arial" style:font-family-asian="Arial" style:font-family-complex="Arial" fo:font-size="12pt"/>
    </style:style>
    <style:style style:parent-style-name="950" style:family="paragraph" style:name="P3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7">
      <style:text-properties fo:color="#1f1f1f" fo:font-family="Arial" style:font-family-asian="Arial" style:font-family-complex="Arial" fo:font-size="12pt" fo:font-weight="bold"/>
    </style:style>
    <style:style style:family="paragraph" style:name="P353">
      <style:paragraph-properties fo:line-height="115%" fo:margin-left="0cm" fo:margin-right="0cm" fo:text-indent="0cm" fo:margin-top="0pt" fo:margin-bottom="0pt" fo:border="none"/>
      <style:text-properties/>
    </style:style>
    <style:style style:family="text" style:name="T1058">
      <style:text-properties fo:color="#1f1f1f" fo:font-family="Arial" style:font-family-asian="Arial" style:font-family-complex="Arial" fo:font-size="12pt"/>
    </style:style>
    <style:style style:parent-style-name="950" style:family="paragraph" style:name="P3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9">
      <style:text-properties fo:color="#1f1f1f" fo:font-family="Arial" style:font-family-asian="Arial" style:font-family-complex="Arial" fo:font-size="12pt" fo:font-weight="bold"/>
    </style:style>
    <style:style style:family="paragraph" style:name="P355">
      <style:paragraph-properties fo:line-height="115%" fo:margin-left="0cm" fo:margin-right="0cm" fo:text-indent="0cm" fo:margin-top="0pt" fo:margin-bottom="0pt" fo:border="none"/>
      <style:text-properties/>
    </style:style>
    <style:style style:family="text" style:name="T1060">
      <style:text-properties fo:color="#1f1f1f" fo:font-family="Arial" style:font-family-asian="Arial" style:font-family-complex="Arial" fo:font-size="12pt"/>
    </style:style>
    <style:style style:parent-style-name="950" style:family="paragraph" style:name="P3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61">
      <style:text-properties fo:color="#1f1f1f" fo:font-family="Arial" style:font-family-asian="Arial" style:font-family-complex="Arial" fo:font-size="12pt" fo:font-weight="bold"/>
    </style:style>
    <style:style style:family="paragraph" style:name="P357">
      <style:paragraph-properties fo:line-height="115%" fo:margin-left="0cm" fo:margin-right="0cm" fo:text-indent="0cm" fo:margin-top="0pt" fo:margin-bottom="0pt" fo:border="none"/>
      <style:text-properties/>
    </style:style>
    <style:style style:family="text" style:name="T1062">
      <style:text-properties fo:color="#1f1f1f" fo:font-family="Arial" style:font-family-asian="Arial" style:font-family-complex="Arial" fo:font-size="12pt"/>
    </style:style>
    <style:style style:parent-style-name="949" style:family="paragraph" style:name="P35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63">
      <style:text-properties fo:color="#1f1f1f" fo:font-family="Arial" style:font-family-asian="Arial" style:font-family-complex="Arial" fo:font-size="14pt" fo:font-weight="bold"/>
    </style:style>
    <style:style style:parent-style-name="1010" style:list-style-name="WWNum28" style:family="paragraph" style:name="P359">
      <style:paragraph-properties fo:line-height="115%" fo:margin-right="0cm" fo:margin-top="0pt" fo:margin-bottom="0pt" fo:border="none"/>
      <style:text-properties/>
    </style:style>
    <style:style style:family="text" style:name="T1064">
      <style:text-properties fo:color="#1f1f1f" fo:font-family="Arial" style:font-family-asian="Arial" style:font-family-complex="Arial" fo:font-size="12pt"/>
    </style:style>
    <style:style style:parent-style-name="1010" style:list-style-name="WWNum28" style:family="paragraph" style:name="P360">
      <style:paragraph-properties fo:line-height="115%" fo:margin-right="0cm" fo:margin-top="0pt" fo:margin-bottom="0pt" fo:border="none"/>
      <style:text-properties/>
    </style:style>
    <style:style style:family="text" style:name="T1065">
      <style:text-properties fo:color="#1f1f1f" fo:font-family="Arial" style:font-family-asian="Arial" style:font-family-complex="Arial" fo:font-size="12pt"/>
    </style:style>
    <style:style style:parent-style-name="1010" style:list-style-name="WWNum28" style:family="paragraph" style:name="P361">
      <style:paragraph-properties fo:line-height="115%" fo:margin-right="0cm" fo:margin-top="0pt" fo:margin-bottom="0pt" fo:border="none"/>
      <style:text-properties/>
    </style:style>
    <style:style style:family="text" style:name="T1066">
      <style:text-properties fo:color="#1f1f1f" fo:font-family="Arial" style:font-family-asian="Arial" style:font-family-complex="Arial" fo:font-size="12pt"/>
    </style:style>
    <style:style style:parent-style-name="1010" style:list-style-name="WWNum28" style:family="paragraph" style:name="P362">
      <style:paragraph-properties fo:line-height="115%" fo:margin-right="0cm" fo:margin-top="0pt" fo:margin-bottom="0pt" fo:border="none"/>
      <style:text-properties/>
    </style:style>
    <style:style style:family="text" style:name="T1067">
      <style:text-properties fo:color="#1f1f1f" fo:font-family="Arial" style:font-family-asian="Arial" style:font-family-complex="Arial" fo:font-size="12pt"/>
    </style:style>
    <style:style style:family="paragraph" style:name="P363">
      <style:paragraph-properties/>
      <style:text-properties/>
    </style:style>
    <style:style style:parent-style-name="949" style:family="paragraph" style:name="P36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68">
      <style:text-properties fo:color="#1f1f1f" fo:font-family="Arial" style:font-family-asian="Arial" style:font-family-complex="Arial" fo:font-size="14pt" fo:font-weight="bold"/>
    </style:style>
    <style:style style:family="paragraph" style:name="P365">
      <style:paragraph-properties fo:line-height="115%" fo:margin-left="0cm" fo:margin-right="0cm" fo:text-indent="0cm" fo:margin-top="0pt" fo:margin-bottom="0pt" fo:border="none"/>
      <style:text-properties/>
    </style:style>
    <style:style style:family="text" style:name="T1069">
      <style:text-properties fo:color="#1f1f1f" fo:font-family="Arial" style:font-family-asian="Arial" style:font-family-complex="Arial" fo:font-size="12pt"/>
    </style:style>
    <style:style style:parent-style-name="950" style:family="paragraph" style:name="P3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0">
      <style:text-properties fo:color="#1f1f1f" fo:font-family="Arial" style:font-family-asian="Arial" style:font-family-complex="Arial" fo:font-size="12pt" fo:font-weight="bold"/>
    </style:style>
    <style:style style:family="paragraph" style:name="P367">
      <style:paragraph-properties fo:line-height="115%" fo:margin-left="0cm" fo:margin-right="0cm" fo:text-indent="0cm" fo:margin-top="0pt" fo:margin-bottom="0pt" fo:border="none"/>
      <style:text-properties/>
    </style:style>
    <style:style style:family="text" style:name="T1071">
      <style:text-properties fo:color="#1f1f1f" fo:font-family="Arial" style:font-family-asian="Arial" style:font-family-complex="Arial" fo:font-size="12pt"/>
    </style:style>
    <style:style style:parent-style-name="950" style:family="paragraph" style:name="P3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2">
      <style:text-properties fo:color="#1f1f1f" fo:font-family="Arial" style:font-family-asian="Arial" style:font-family-complex="Arial" fo:font-size="12pt" fo:font-weight="bold"/>
    </style:style>
    <style:style style:family="paragraph" style:name="P369">
      <style:paragraph-properties fo:line-height="115%" fo:margin-left="0cm" fo:margin-right="0cm" fo:text-indent="0cm" fo:margin-top="0pt" fo:margin-bottom="0pt" fo:border="none"/>
      <style:text-properties/>
    </style:style>
    <style:style style:family="text" style:name="T1073">
      <style:text-properties fo:color="#1f1f1f" fo:font-family="Arial" style:font-family-asian="Arial" style:font-family-complex="Arial" fo:font-size="12pt"/>
    </style:style>
    <style:style style:parent-style-name="950" style:family="paragraph" style:name="P3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4">
      <style:text-properties fo:color="#1f1f1f" fo:font-family="Arial" style:font-family-asian="Arial" style:font-family-complex="Arial" fo:font-size="12pt" fo:font-weight="bold"/>
    </style:style>
    <style:style style:family="paragraph" style:name="P371">
      <style:paragraph-properties fo:line-height="115%" fo:margin-left="0cm" fo:margin-right="0cm" fo:text-indent="0cm" fo:margin-top="0pt" fo:margin-bottom="0pt" fo:border="none"/>
      <style:text-properties/>
    </style:style>
    <style:style style:family="text" style:name="T1075">
      <style:text-properties fo:color="#1f1f1f" fo:font-family="Arial" style:font-family-asian="Arial" style:font-family-complex="Arial" fo:font-size="12pt"/>
    </style:style>
    <style:style style:parent-style-name="950" style:family="paragraph" style:name="P3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6">
      <style:text-properties fo:color="#1f1f1f" fo:font-family="Arial" style:font-family-asian="Arial" style:font-family-complex="Arial" fo:font-size="12pt" fo:font-weight="bold"/>
    </style:style>
    <style:style style:family="paragraph" style:name="P373">
      <style:paragraph-properties fo:line-height="115%" fo:margin-left="0cm" fo:margin-right="0cm" fo:text-indent="0cm" fo:margin-top="0pt" fo:margin-bottom="0pt" fo:border="none"/>
      <style:text-properties/>
    </style:style>
    <style:style style:family="text" style:name="T1077">
      <style:text-properties fo:color="#1f1f1f" fo:font-family="Arial" style:font-family-asian="Arial" style:font-family-complex="Arial" fo:font-size="12pt"/>
    </style:style>
    <style:style style:parent-style-name="949" style:family="paragraph" style:name="P37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78">
      <style:text-properties fo:color="#1f1f1f" fo:font-family="Arial" style:font-family-asian="Arial" style:font-family-complex="Arial" fo:font-size="14pt" fo:font-weight="bold"/>
    </style:style>
    <style:style style:parent-style-name="1010" style:list-style-name="WWNum29" style:family="paragraph" style:name="P375">
      <style:paragraph-properties fo:line-height="115%" fo:margin-right="0cm" fo:margin-top="0pt" fo:margin-bottom="0pt" fo:border="none"/>
      <style:text-properties/>
    </style:style>
    <style:style style:family="text" style:name="T1079">
      <style:text-properties fo:color="#1f1f1f" fo:font-family="Arial" style:font-family-asian="Arial" style:font-family-complex="Arial" fo:font-size="12pt"/>
    </style:style>
    <style:style style:parent-style-name="1010" style:list-style-name="WWNum29" style:family="paragraph" style:name="P376">
      <style:paragraph-properties fo:line-height="115%" fo:margin-right="0cm" fo:margin-top="0pt" fo:margin-bottom="0pt" fo:border="none"/>
      <style:text-properties/>
    </style:style>
    <style:style style:family="text" style:name="T1080">
      <style:text-properties fo:color="#1f1f1f" fo:font-family="Arial" style:font-family-asian="Arial" style:font-family-complex="Arial" fo:font-size="12pt"/>
    </style:style>
    <style:style style:parent-style-name="1010" style:list-style-name="WWNum29" style:family="paragraph" style:name="P377">
      <style:paragraph-properties fo:line-height="115%" fo:margin-right="0cm" fo:margin-top="0pt" fo:margin-bottom="0pt" fo:border="none"/>
      <style:text-properties/>
    </style:style>
    <style:style style:family="text" style:name="T1081">
      <style:text-properties fo:color="#1f1f1f" fo:font-family="Arial" style:font-family-asian="Arial" style:font-family-complex="Arial" fo:font-size="12pt"/>
    </style:style>
    <style:style style:parent-style-name="1010" style:list-style-name="WWNum29" style:family="paragraph" style:name="P378">
      <style:paragraph-properties fo:line-height="115%" fo:margin-right="0cm" fo:margin-top="0pt" fo:margin-bottom="0pt" fo:border="none"/>
      <style:text-properties/>
    </style:style>
    <style:style style:family="text" style:name="T1082">
      <style:text-properties fo:color="#1f1f1f" fo:font-family="Arial" style:font-family-asian="Arial" style:font-family-complex="Arial" fo:font-size="12pt"/>
    </style:style>
    <style:style style:family="paragraph" style:name="P379">
      <style:paragraph-properties/>
      <style:text-properties/>
    </style:style>
    <style:style style:parent-style-name="949" style:family="paragraph" style:name="P38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83">
      <style:text-properties fo:color="#1f1f1f" fo:font-family="Arial" style:font-family-asian="Arial" style:font-family-complex="Arial" fo:font-size="14pt" fo:font-weight="bold"/>
    </style:style>
    <style:style style:family="paragraph" style:name="P381">
      <style:paragraph-properties fo:line-height="115%" fo:margin-left="0cm" fo:margin-right="0cm" fo:text-indent="0cm" fo:margin-top="0pt" fo:margin-bottom="0pt" fo:border="none"/>
      <style:text-properties/>
    </style:style>
    <style:style style:family="text" style:name="T1084">
      <style:text-properties fo:color="#1f1f1f" fo:font-family="Arial" style:font-family-asian="Arial" style:font-family-complex="Arial" fo:font-size="12pt"/>
    </style:style>
    <style:style style:parent-style-name="950" style:family="paragraph" style:name="P38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85">
      <style:text-properties fo:color="#1f1f1f" fo:font-family="Arial" style:font-family-asian="Arial" style:font-family-complex="Arial" fo:font-size="12pt" fo:font-weight="bold"/>
    </style:style>
    <style:style style:family="paragraph" style:name="P383">
      <style:paragraph-properties fo:line-height="115%" fo:margin-left="0cm" fo:margin-right="0cm" fo:text-indent="0cm" fo:margin-top="0pt" fo:margin-bottom="0pt" fo:border="none"/>
      <style:text-properties/>
    </style:style>
    <style:style style:family="text" style:name="T1086">
      <style:text-properties fo:color="#1f1f1f" fo:font-family="Arial" style:font-family-asian="Arial" style:font-family-complex="Arial" fo:font-size="12pt"/>
    </style:style>
    <style:style style:parent-style-name="950" style:family="paragraph" style:name="P38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87">
      <style:text-properties fo:color="#1f1f1f" fo:font-family="Arial" style:font-family-asian="Arial" style:font-family-complex="Arial" fo:font-size="12pt" fo:font-weight="bold"/>
    </style:style>
    <style:style style:family="paragraph" style:name="P385">
      <style:paragraph-properties fo:line-height="115%" fo:margin-left="0cm" fo:margin-right="0cm" fo:text-indent="0cm" fo:margin-top="0pt" fo:margin-bottom="0pt" fo:border="none"/>
      <style:text-properties/>
    </style:style>
    <style:style style:family="text" style:name="T1088">
      <style:text-properties fo:color="#1f1f1f" fo:font-family="Arial" style:font-family-asian="Arial" style:font-family-complex="Arial" fo:font-size="12pt"/>
    </style:style>
    <style:style style:family="text" style:name="T1089">
      <style:text-properties fo:color="#1f1f1f" fo:font-family="Arial" style:font-family-asian="Arial" style:font-family-complex="Arial" fo:font-size="12pt"/>
    </style:style>
    <style:style style:parent-style-name="950" style:family="paragraph" style:name="P38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90">
      <style:text-properties fo:color="#1f1f1f" fo:font-family="Arial" style:font-family-asian="Arial" style:font-family-complex="Arial" fo:font-size="12pt" fo:font-weight="bold"/>
    </style:style>
    <style:style style:family="paragraph" style:name="P387">
      <style:paragraph-properties fo:line-height="115%" fo:margin-left="0cm" fo:margin-right="0cm" fo:text-indent="0cm" fo:margin-top="0pt" fo:margin-bottom="0pt" fo:border="none"/>
      <style:text-properties/>
    </style:style>
    <style:style style:family="text" style:name="T1091">
      <style:text-properties fo:color="#1f1f1f" fo:font-family="Arial" style:font-family-asian="Arial" style:font-family-complex="Arial" fo:font-size="12pt"/>
    </style:style>
    <style:style style:parent-style-name="950" style:family="paragraph" style:name="P38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92">
      <style:text-properties fo:color="#1f1f1f" fo:font-family="Arial" style:font-family-asian="Arial" style:font-family-complex="Arial" fo:font-size="12pt" fo:font-weight="bold"/>
    </style:style>
    <style:style style:family="paragraph" style:name="P389">
      <style:paragraph-properties fo:line-height="115%" fo:margin-left="0cm" fo:margin-right="0cm" fo:text-indent="0cm" fo:margin-top="0pt" fo:margin-bottom="0pt" fo:border="none"/>
      <style:text-properties/>
    </style:style>
    <style:style style:family="text" style:name="T1093">
      <style:text-properties fo:color="#1f1f1f" fo:font-family="Arial" style:font-family-asian="Arial" style:font-family-complex="Arial" fo:font-size="12pt"/>
    </style:style>
    <style:style style:parent-style-name="949" style:family="paragraph" style:name="P39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94">
      <style:text-properties fo:color="#1f1f1f" fo:font-family="Arial" style:font-family-asian="Arial" style:font-family-complex="Arial" fo:font-size="14pt" fo:font-weight="bold"/>
    </style:style>
    <style:style style:parent-style-name="1010" style:list-style-name="WWNum30" style:family="paragraph" style:name="P391">
      <style:paragraph-properties fo:line-height="115%" fo:margin-right="0cm" fo:margin-top="0pt" fo:margin-bottom="0pt" fo:border="none"/>
      <style:text-properties/>
    </style:style>
    <style:style style:family="text" style:name="T1095">
      <style:text-properties fo:color="#1f1f1f" fo:font-family="Arial" style:font-family-asian="Arial" style:font-family-complex="Arial" fo:font-size="12pt"/>
    </style:style>
    <style:style style:parent-style-name="1010" style:list-style-name="WWNum30" style:family="paragraph" style:name="P392">
      <style:paragraph-properties fo:line-height="115%" fo:margin-right="0cm" fo:margin-top="0pt" fo:margin-bottom="0pt" fo:border="none"/>
      <style:text-properties/>
    </style:style>
    <style:style style:family="text" style:name="T1096">
      <style:text-properties fo:color="#1f1f1f" fo:font-family="Arial" style:font-family-asian="Arial" style:font-family-complex="Arial" fo:font-size="12pt"/>
    </style:style>
    <style:style style:parent-style-name="1010" style:list-style-name="WWNum30" style:family="paragraph" style:name="P393">
      <style:paragraph-properties fo:line-height="115%" fo:margin-right="0cm" fo:margin-top="0pt" fo:margin-bottom="0pt" fo:border="none"/>
      <style:text-properties/>
    </style:style>
    <style:style style:family="text" style:name="T1097">
      <style:text-properties fo:color="#1f1f1f" fo:font-family="Arial" style:font-family-asian="Arial" style:font-family-complex="Arial" fo:font-size="12pt"/>
    </style:style>
    <style:style style:parent-style-name="1010" style:list-style-name="WWNum30" style:family="paragraph" style:name="P394">
      <style:paragraph-properties fo:line-height="115%" fo:margin-right="0cm" fo:margin-top="0pt" fo:margin-bottom="0pt" fo:border="none"/>
      <style:text-properties/>
    </style:style>
    <style:style style:family="text" style:name="T1098">
      <style:text-properties fo:color="#1f1f1f" fo:font-family="Arial" style:font-family-asian="Arial" style:font-family-complex="Arial" fo:font-size="12pt"/>
    </style:style>
    <style:style style:family="paragraph" style:name="P395">
      <style:paragraph-properties/>
      <style:text-properties/>
    </style:style>
    <style:style style:family="paragraph" style:name="P396">
      <style:paragraph-properties fo:line-height="115%" fo:margin-left="0cm" fo:margin-right="0cm" fo:text-indent="0cm" fo:margin-top="0pt" fo:margin-bottom="0pt" fo:break-before="page" fo:border="none"/>
      <style:text-properties/>
    </style:style>
    <style:style style:family="text" style:name="T1099">
      <style:text-properties fo:color="#1f1f1f" fo:font-family="Arial" style:font-family-asian="Arial" style:font-family-complex="Arial" fo:font-size="12pt"/>
    </style:style>
    <style:style style:parent-style-name="949" style:family="paragraph" style:name="P39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00">
      <style:text-properties fo:color="#1f1f1f" fo:font-family="Arial" style:font-family-asian="Arial" style:font-family-complex="Arial" fo:font-size="14pt" fo:font-weight="bold"/>
    </style:style>
    <style:style style:family="paragraph" style:name="P398">
      <style:paragraph-properties fo:line-height="115%" fo:margin-left="0cm" fo:margin-right="0cm" fo:text-indent="0cm" fo:margin-top="0pt" fo:margin-bottom="0pt" fo:border="none"/>
      <style:text-properties/>
    </style:style>
    <style:style style:family="text" style:name="T1101">
      <style:text-properties fo:color="#1f1f1f" fo:font-family="Arial" style:font-family-asian="Arial" style:font-family-complex="Arial" fo:font-size="12pt"/>
    </style:style>
    <style:style style:parent-style-name="950" style:family="paragraph" style:name="P3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02">
      <style:text-properties fo:color="#1f1f1f" fo:font-family="Arial" style:font-family-asian="Arial" style:font-family-complex="Arial" fo:font-size="12pt" fo:font-weight="bold"/>
    </style:style>
    <style:style style:family="paragraph" style:name="P400">
      <style:paragraph-properties fo:line-height="115%" fo:margin-left="0cm" fo:margin-right="0cm" fo:text-indent="0cm" fo:margin-top="0pt" fo:margin-bottom="0pt" fo:border="none"/>
      <style:text-properties/>
    </style:style>
    <style:style style:family="text" style:name="T1103">
      <style:text-properties fo:color="#1f1f1f" fo:font-family="Arial" style:font-family-asian="Arial" style:font-family-complex="Arial" fo:font-size="12pt"/>
    </style:style>
    <style:style style:parent-style-name="950" style:family="paragraph" style:name="P4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04">
      <style:text-properties fo:color="#1f1f1f" fo:font-family="Arial" style:font-family-asian="Arial" style:font-family-complex="Arial" fo:font-size="12pt" fo:font-weight="bold"/>
    </style:style>
    <style:style style:family="paragraph" style:name="P402">
      <style:paragraph-properties fo:line-height="115%" fo:margin-left="0cm" fo:margin-right="0cm" fo:text-indent="0cm" fo:margin-top="0pt" fo:margin-bottom="0pt" fo:border="none"/>
      <style:text-properties/>
    </style:style>
    <style:style style:family="text" style:name="T1105">
      <style:text-properties fo:color="#1f1f1f" fo:font-family="Arial" style:font-family-asian="Arial" style:font-family-complex="Arial" fo:font-size="12pt"/>
    </style:style>
    <style:style style:parent-style-name="950" style:family="paragraph" style:name="P4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06">
      <style:text-properties fo:color="#1f1f1f" fo:font-family="Arial" style:font-family-asian="Arial" style:font-family-complex="Arial" fo:font-size="12pt" fo:font-weight="bold"/>
    </style:style>
    <style:style style:family="paragraph" style:name="P404">
      <style:paragraph-properties fo:line-height="115%" fo:margin-left="0cm" fo:margin-right="0cm" fo:text-indent="0cm" fo:margin-top="0pt" fo:margin-bottom="0pt" fo:border="none"/>
      <style:text-properties/>
    </style:style>
    <style:style style:family="text" style:name="T1107">
      <style:text-properties fo:color="#1f1f1f" fo:font-family="Arial" style:font-family-asian="Arial" style:font-family-complex="Arial" fo:font-size="12pt"/>
    </style:style>
    <style:style style:parent-style-name="950" style:family="paragraph" style:name="P4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08">
      <style:text-properties fo:color="#1f1f1f" fo:font-family="Arial" style:font-family-asian="Arial" style:font-family-complex="Arial" fo:font-size="12pt" fo:font-weight="bold"/>
    </style:style>
    <style:style style:family="paragraph" style:name="P406">
      <style:paragraph-properties fo:line-height="115%" fo:margin-left="0cm" fo:margin-right="0cm" fo:text-indent="0cm" fo:margin-top="0pt" fo:margin-bottom="0pt" fo:border="none"/>
      <style:text-properties/>
    </style:style>
    <style:style style:family="text" style:name="T1109">
      <style:text-properties fo:color="#1f1f1f" fo:font-family="Arial" style:font-family-asian="Arial" style:font-family-complex="Arial" fo:font-size="12pt"/>
    </style:style>
    <style:style style:parent-style-name="949" style:family="paragraph" style:name="P40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10">
      <style:text-properties fo:color="#1f1f1f" fo:font-family="Arial" style:font-family-asian="Arial" style:font-family-complex="Arial" fo:font-size="14pt" fo:font-weight="bold"/>
    </style:style>
    <style:style style:parent-style-name="1010" style:list-style-name="WWNum31" style:family="paragraph" style:name="P408">
      <style:paragraph-properties fo:line-height="115%" fo:margin-right="0cm" fo:margin-top="0pt" fo:margin-bottom="0pt" fo:border="none"/>
      <style:text-properties/>
    </style:style>
    <style:style style:family="text" style:name="T1111">
      <style:text-properties fo:color="#1f1f1f" fo:font-family="Arial" style:font-family-asian="Arial" style:font-family-complex="Arial" fo:font-size="12pt"/>
    </style:style>
    <style:style style:parent-style-name="1010" style:list-style-name="WWNum31" style:family="paragraph" style:name="P409">
      <style:paragraph-properties fo:line-height="115%" fo:margin-right="0cm" fo:margin-top="0pt" fo:margin-bottom="0pt" fo:border="none"/>
      <style:text-properties/>
    </style:style>
    <style:style style:family="text" style:name="T1112">
      <style:text-properties fo:color="#1f1f1f" fo:font-family="Arial" style:font-family-asian="Arial" style:font-family-complex="Arial" fo:font-size="12pt"/>
    </style:style>
    <style:style style:parent-style-name="1010" style:list-style-name="WWNum31" style:family="paragraph" style:name="P410">
      <style:paragraph-properties fo:line-height="115%" fo:margin-right="0cm" fo:margin-top="0pt" fo:margin-bottom="0pt" fo:border="none"/>
      <style:text-properties/>
    </style:style>
    <style:style style:family="text" style:name="T1113">
      <style:text-properties fo:color="#1f1f1f" fo:font-family="Arial" style:font-family-asian="Arial" style:font-family-complex="Arial" fo:font-size="12pt"/>
    </style:style>
    <style:style style:parent-style-name="1010" style:list-style-name="WWNum31" style:family="paragraph" style:name="P411">
      <style:paragraph-properties fo:line-height="115%" fo:margin-right="0cm" fo:margin-top="0pt" fo:margin-bottom="0pt" fo:border="none"/>
      <style:text-properties/>
    </style:style>
    <style:style style:family="text" style:name="T1114">
      <style:text-properties fo:color="#1f1f1f" fo:font-family="Arial" style:font-family-asian="Arial" style:font-family-complex="Arial" fo:font-size="12pt"/>
    </style:style>
    <style:style style:family="paragraph" style:name="P412">
      <style:paragraph-properties/>
      <style:text-properties/>
    </style:style>
    <style:style style:parent-style-name="949" style:family="paragraph" style:name="P41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15">
      <style:text-properties fo:color="#1f1f1f" fo:font-family="Arial" style:font-family-asian="Arial" style:font-family-complex="Arial" fo:font-size="14pt" fo:font-weight="bold"/>
    </style:style>
    <style:style style:family="paragraph" style:name="P414">
      <style:paragraph-properties fo:line-height="115%" fo:margin-left="0cm" fo:margin-right="0cm" fo:text-indent="0cm" fo:margin-top="0pt" fo:margin-bottom="0pt" fo:border="none"/>
      <style:text-properties/>
    </style:style>
    <style:style style:family="text" style:name="T1116">
      <style:text-properties fo:color="#1f1f1f" fo:font-family="Arial" style:font-family-asian="Arial" style:font-family-complex="Arial" fo:font-size="12pt"/>
    </style:style>
    <style:style style:parent-style-name="950" style:family="paragraph" style:name="P41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7">
      <style:text-properties fo:color="#1f1f1f" fo:font-family="Arial" style:font-family-asian="Arial" style:font-family-complex="Arial" fo:font-size="12pt" fo:font-weight="bold"/>
    </style:style>
    <style:style style:family="paragraph" style:name="P416">
      <style:paragraph-properties fo:line-height="115%" fo:margin-left="0cm" fo:margin-right="0cm" fo:text-indent="0cm" fo:margin-top="0pt" fo:margin-bottom="0pt" fo:border="none"/>
      <style:text-properties/>
    </style:style>
    <style:style style:family="text" style:name="T1118">
      <style:text-properties fo:color="#1f1f1f" fo:font-family="Arial" style:font-family-asian="Arial" style:font-family-complex="Arial" fo:font-size="12pt"/>
    </style:style>
    <style:style style:parent-style-name="950" style:family="paragraph" style:name="P41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9">
      <style:text-properties fo:color="#1f1f1f" fo:font-family="Arial" style:font-family-asian="Arial" style:font-family-complex="Arial" fo:font-size="12pt" fo:font-weight="bold"/>
    </style:style>
    <style:style style:family="paragraph" style:name="P418">
      <style:paragraph-properties fo:line-height="115%" fo:margin-left="0cm" fo:margin-right="0cm" fo:text-indent="0cm" fo:margin-top="0pt" fo:margin-bottom="0pt" fo:border="none"/>
      <style:text-properties/>
    </style:style>
    <style:style style:family="text" style:name="T1120">
      <style:text-properties fo:color="#1f1f1f" fo:font-family="Arial" style:font-family-asian="Arial" style:font-family-complex="Arial" fo:font-size="12pt"/>
    </style:style>
    <style:style style:parent-style-name="950" style:family="paragraph" style:name="P41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21">
      <style:text-properties fo:color="#1f1f1f" fo:font-family="Arial" style:font-family-asian="Arial" style:font-family-complex="Arial" fo:font-size="12pt" fo:font-weight="bold"/>
    </style:style>
    <style:style style:family="paragraph" style:name="P420">
      <style:paragraph-properties fo:line-height="115%" fo:margin-left="0cm" fo:margin-right="0cm" fo:text-indent="0cm" fo:margin-top="0pt" fo:margin-bottom="0pt" fo:border="none"/>
      <style:text-properties/>
    </style:style>
    <style:style style:family="text" style:name="T1122">
      <style:text-properties fo:color="#1f1f1f" fo:font-family="Arial" style:font-family-asian="Arial" style:font-family-complex="Arial" fo:font-size="12pt"/>
    </style:style>
    <style:style style:parent-style-name="950" style:family="paragraph" style:name="P42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23">
      <style:text-properties fo:color="#1f1f1f" fo:font-family="Arial" style:font-family-asian="Arial" style:font-family-complex="Arial" fo:font-size="12pt" fo:font-weight="bold"/>
    </style:style>
    <style:style style:family="paragraph" style:name="P422">
      <style:paragraph-properties fo:line-height="115%" fo:margin-left="0cm" fo:margin-right="0cm" fo:text-indent="0cm" fo:margin-top="0pt" fo:margin-bottom="0pt" fo:border="none"/>
      <style:text-properties/>
    </style:style>
    <style:style style:family="text" style:name="T1124">
      <style:text-properties fo:color="#1f1f1f" fo:font-family="Arial" style:font-family-asian="Arial" style:font-family-complex="Arial" fo:font-size="12pt"/>
    </style:style>
    <style:style style:parent-style-name="949" style:family="paragraph" style:name="P42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25">
      <style:text-properties fo:color="#1f1f1f" fo:font-family="Arial" style:font-family-asian="Arial" style:font-family-complex="Arial" fo:font-size="14pt" fo:font-weight="bold"/>
    </style:style>
    <style:style style:parent-style-name="1010" style:list-style-name="WWNum32" style:family="paragraph" style:name="P424">
      <style:paragraph-properties fo:line-height="115%" fo:margin-right="0cm" fo:margin-top="0pt" fo:margin-bottom="0pt" fo:border="none"/>
      <style:text-properties/>
    </style:style>
    <style:style style:family="text" style:name="T1126">
      <style:text-properties fo:color="#1f1f1f" fo:font-family="Arial" style:font-family-asian="Arial" style:font-family-complex="Arial" fo:font-size="12pt"/>
    </style:style>
    <style:style style:parent-style-name="1010" style:list-style-name="WWNum32" style:family="paragraph" style:name="P425">
      <style:paragraph-properties fo:line-height="115%" fo:margin-right="0cm" fo:margin-top="0pt" fo:margin-bottom="0pt" fo:border="none"/>
      <style:text-properties/>
    </style:style>
    <style:style style:family="text" style:name="T1127">
      <style:text-properties fo:color="#1f1f1f" fo:font-family="Arial" style:font-family-asian="Arial" style:font-family-complex="Arial" fo:font-size="12pt"/>
    </style:style>
    <style:style style:parent-style-name="1010" style:list-style-name="WWNum32" style:family="paragraph" style:name="P426">
      <style:paragraph-properties fo:line-height="115%" fo:margin-right="0cm" fo:margin-top="0pt" fo:margin-bottom="0pt" fo:border="none"/>
      <style:text-properties/>
    </style:style>
    <style:style style:family="text" style:name="T1128">
      <style:text-properties fo:color="#1f1f1f" fo:font-family="Arial" style:font-family-asian="Arial" style:font-family-complex="Arial" fo:font-size="12pt"/>
    </style:style>
    <style:style style:parent-style-name="1010" style:list-style-name="WWNum32" style:family="paragraph" style:name="P427">
      <style:paragraph-properties fo:line-height="115%" fo:margin-right="0cm" fo:margin-top="0pt" fo:margin-bottom="0pt" fo:border="none"/>
      <style:text-properties/>
    </style:style>
    <style:style style:family="text" style:name="T1129">
      <style:text-properties fo:color="#1f1f1f" fo:font-family="Arial" style:font-family-asian="Arial" style:font-family-complex="Arial" fo:font-size="12pt"/>
    </style:style>
    <style:style style:family="paragraph" style:name="P428">
      <style:paragraph-properties/>
      <style:text-properties/>
    </style:style>
    <style:style style:family="paragraph" style:name="P429">
      <style:paragraph-properties fo:line-height="115%" fo:margin-left="0cm" fo:margin-right="0cm" fo:text-indent="0cm" fo:margin-top="0pt" fo:margin-bottom="0pt" fo:break-before="page" fo:border="none"/>
      <style:text-properties/>
    </style:style>
    <style:style style:family="text" style:name="T1130">
      <style:text-properties fo:color="#1f1f1f" fo:font-family="Arial" style:font-family-asian="Arial" style:font-family-complex="Arial" fo:font-size="12pt"/>
    </style:style>
    <style:style style:parent-style-name="949" style:family="paragraph" style:name="P43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31">
      <style:text-properties fo:color="#1f1f1f" fo:font-family="Arial" style:font-family-asian="Arial" style:font-family-complex="Arial" fo:font-size="14pt" fo:font-weight="bold"/>
    </style:style>
    <style:style style:family="paragraph" style:name="P431">
      <style:paragraph-properties fo:line-height="115%" fo:margin-left="0cm" fo:margin-right="0cm" fo:text-indent="0cm" fo:margin-top="0pt" fo:margin-bottom="0pt" fo:border="none"/>
      <style:text-properties/>
    </style:style>
    <style:style style:family="text" style:name="T1132">
      <style:text-properties fo:color="#1f1f1f" fo:font-family="Arial" style:font-family-asian="Arial" style:font-family-complex="Arial" fo:font-size="12pt"/>
    </style:style>
    <style:style style:parent-style-name="950" style:family="paragraph" style:name="P4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3">
      <style:text-properties fo:color="#1f1f1f" fo:font-family="Arial" style:font-family-asian="Arial" style:font-family-complex="Arial" fo:font-size="12pt" fo:font-weight="bold"/>
    </style:style>
    <style:style style:family="paragraph" style:name="P433">
      <style:paragraph-properties fo:line-height="115%" fo:margin-left="0cm" fo:margin-right="0cm" fo:text-indent="0cm" fo:margin-top="0pt" fo:margin-bottom="0pt" fo:border="none"/>
      <style:text-properties/>
    </style:style>
    <style:style style:family="text" style:name="T1134">
      <style:text-properties fo:color="#1f1f1f" fo:font-family="Arial" style:font-family-asian="Arial" style:font-family-complex="Arial" fo:font-size="12pt"/>
    </style:style>
    <style:style style:family="text" style:name="T1135">
      <style:text-properties fo:color="#1f1f1f" fo:font-family="Arial" style:font-family-asian="Arial" style:font-family-complex="Arial" fo:font-size="12pt"/>
    </style:style>
    <style:style style:parent-style-name="950" style:family="paragraph" style:name="P43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6">
      <style:text-properties fo:color="#1f1f1f" fo:font-family="Arial" style:font-family-asian="Arial" style:font-family-complex="Arial" fo:font-size="12pt" fo:font-weight="bold"/>
    </style:style>
    <style:style style:family="paragraph" style:name="P435">
      <style:paragraph-properties fo:line-height="115%" fo:margin-left="0cm" fo:margin-right="0cm" fo:text-indent="0cm" fo:margin-top="0pt" fo:margin-bottom="0pt" fo:border="none"/>
      <style:text-properties/>
    </style:style>
    <style:style style:family="text" style:name="T1137">
      <style:text-properties fo:color="#1f1f1f" fo:font-family="Arial" style:font-family-asian="Arial" style:font-family-complex="Arial" fo:font-size="12pt"/>
    </style:style>
    <style:style style:parent-style-name="950" style:family="paragraph" style:name="P4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8">
      <style:text-properties fo:color="#1f1f1f" fo:font-family="Arial" style:font-family-asian="Arial" style:font-family-complex="Arial" fo:font-size="12pt" fo:font-weight="bold"/>
    </style:style>
    <style:style style:family="paragraph" style:name="P437">
      <style:paragraph-properties fo:line-height="115%" fo:margin-left="0cm" fo:margin-right="0cm" fo:text-indent="0cm" fo:margin-top="0pt" fo:margin-bottom="0pt" fo:border="none"/>
      <style:text-properties/>
    </style:style>
    <style:style style:family="text" style:name="T1139">
      <style:text-properties fo:color="#1f1f1f" fo:font-family="Arial" style:font-family-asian="Arial" style:font-family-complex="Arial" fo:font-size="12pt"/>
    </style:style>
    <style:style style:parent-style-name="950" style:family="paragraph" style:name="P4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40">
      <style:text-properties fo:color="#1f1f1f" fo:font-family="Arial" style:font-family-asian="Arial" style:font-family-complex="Arial" fo:font-size="12pt" fo:font-weight="bold"/>
    </style:style>
    <style:style style:family="paragraph" style:name="P439">
      <style:paragraph-properties fo:line-height="115%" fo:margin-left="0cm" fo:margin-right="0cm" fo:text-indent="0cm" fo:margin-top="0pt" fo:margin-bottom="0pt" fo:border="none"/>
      <style:text-properties/>
    </style:style>
    <style:style style:family="text" style:name="T1141">
      <style:text-properties fo:color="#1f1f1f" fo:font-family="Arial" style:font-family-asian="Arial" style:font-family-complex="Arial" fo:font-size="12pt"/>
    </style:style>
    <style:style style:parent-style-name="949" style:family="paragraph" style:name="P44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42">
      <style:text-properties fo:color="#1f1f1f" fo:font-family="Arial" style:font-family-asian="Arial" style:font-family-complex="Arial" fo:font-size="14pt" fo:font-weight="bold"/>
    </style:style>
    <style:style style:parent-style-name="1010" style:list-style-name="WWNum33" style:family="paragraph" style:name="P441">
      <style:paragraph-properties fo:line-height="115%" fo:margin-right="0cm" fo:margin-top="0pt" fo:margin-bottom="0pt" fo:border="none"/>
      <style:text-properties/>
    </style:style>
    <style:style style:family="text" style:name="T1143">
      <style:text-properties fo:color="#1f1f1f" fo:font-family="Arial" style:font-family-asian="Arial" style:font-family-complex="Arial" fo:font-size="12pt"/>
    </style:style>
    <style:style style:parent-style-name="1010" style:list-style-name="WWNum33" style:family="paragraph" style:name="P442">
      <style:paragraph-properties fo:line-height="115%" fo:margin-right="0cm" fo:margin-top="0pt" fo:margin-bottom="0pt" fo:border="none"/>
      <style:text-properties/>
    </style:style>
    <style:style style:family="text" style:name="T1144">
      <style:text-properties fo:color="#1f1f1f" fo:font-family="Arial" style:font-family-asian="Arial" style:font-family-complex="Arial" fo:font-size="12pt"/>
    </style:style>
    <style:style style:parent-style-name="1010" style:list-style-name="WWNum33" style:family="paragraph" style:name="P443">
      <style:paragraph-properties fo:line-height="115%" fo:margin-right="0cm" fo:margin-top="0pt" fo:margin-bottom="0pt" fo:border="none"/>
      <style:text-properties/>
    </style:style>
    <style:style style:family="text" style:name="T1145">
      <style:text-properties fo:color="#1f1f1f" fo:font-family="Arial" style:font-family-asian="Arial" style:font-family-complex="Arial" fo:font-size="12pt"/>
    </style:style>
    <style:style style:parent-style-name="1010" style:list-style-name="WWNum33" style:family="paragraph" style:name="P444">
      <style:paragraph-properties fo:line-height="115%" fo:margin-right="0cm" fo:margin-top="0pt" fo:margin-bottom="0pt" fo:border="none"/>
      <style:text-properties/>
    </style:style>
    <style:style style:family="text" style:name="T1146">
      <style:text-properties fo:color="#1f1f1f" fo:font-family="Arial" style:font-family-asian="Arial" style:font-family-complex="Arial" fo:font-size="12pt"/>
    </style:style>
    <style:style style:family="paragraph" style:name="P445">
      <style:paragraph-properties/>
      <style:text-properties/>
    </style:style>
    <style:style style:parent-style-name="949" style:family="paragraph" style:name="P44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47">
      <style:text-properties fo:color="#1f1f1f" fo:font-family="Arial" style:font-family-asian="Arial" style:font-family-complex="Arial" fo:font-size="14pt" fo:font-weight="bold"/>
    </style:style>
    <style:style style:family="paragraph" style:name="P447">
      <style:paragraph-properties fo:line-height="115%" fo:margin-left="0cm" fo:margin-right="0cm" fo:text-indent="0cm" fo:margin-top="0pt" fo:margin-bottom="0pt" fo:border="none"/>
      <style:text-properties/>
    </style:style>
    <style:style style:family="text" style:name="T1148">
      <style:text-properties fo:color="#1f1f1f" fo:font-family="Arial" style:font-family-asian="Arial" style:font-family-complex="Arial" fo:font-size="12pt"/>
    </style:style>
    <style:style style:parent-style-name="950" style:family="paragraph" style:name="P4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49">
      <style:text-properties fo:color="#1f1f1f" fo:font-family="Arial" style:font-family-asian="Arial" style:font-family-complex="Arial" fo:font-size="12pt" fo:font-weight="bold"/>
    </style:style>
    <style:style style:family="paragraph" style:name="P449">
      <style:paragraph-properties fo:line-height="115%" fo:margin-left="0cm" fo:margin-right="0cm" fo:text-indent="0cm" fo:margin-top="0pt" fo:margin-bottom="0pt" fo:border="none"/>
      <style:text-properties/>
    </style:style>
    <style:style style:family="text" style:name="T1150">
      <style:text-properties fo:color="#1f1f1f" fo:font-family="Arial" style:font-family-asian="Arial" style:font-family-complex="Arial" fo:font-size="12pt"/>
    </style:style>
    <style:style style:parent-style-name="950" style:family="paragraph" style:name="P4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51">
      <style:text-properties fo:color="#1f1f1f" fo:font-family="Arial" style:font-family-asian="Arial" style:font-family-complex="Arial" fo:font-size="12pt" fo:font-weight="bold"/>
    </style:style>
    <style:style style:family="paragraph" style:name="P451">
      <style:paragraph-properties fo:line-height="115%" fo:margin-left="0cm" fo:margin-right="0cm" fo:text-indent="0cm" fo:margin-top="0pt" fo:margin-bottom="0pt" fo:border="none"/>
      <style:text-properties/>
    </style:style>
    <style:style style:family="text" style:name="T1152">
      <style:text-properties fo:color="#1f1f1f" fo:font-family="Arial" style:font-family-asian="Arial" style:font-family-complex="Arial" fo:font-size="12pt"/>
    </style:style>
    <style:style style:parent-style-name="950" style:family="paragraph" style:name="P4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53">
      <style:text-properties fo:color="#1f1f1f" fo:font-family="Arial" style:font-family-asian="Arial" style:font-family-complex="Arial" fo:font-size="12pt" fo:font-weight="bold"/>
    </style:style>
    <style:style style:family="paragraph" style:name="P453">
      <style:paragraph-properties fo:line-height="115%" fo:margin-left="0cm" fo:margin-right="0cm" fo:text-indent="0cm" fo:margin-top="0pt" fo:margin-bottom="0pt" fo:border="none"/>
      <style:text-properties/>
    </style:style>
    <style:style style:family="text" style:name="T1154">
      <style:text-properties fo:color="#1f1f1f" fo:font-family="Arial" style:font-family-asian="Arial" style:font-family-complex="Arial" fo:font-size="12pt"/>
    </style:style>
    <style:style style:parent-style-name="950" style:family="paragraph" style:name="P4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55">
      <style:text-properties fo:color="#1f1f1f" fo:font-family="Arial" style:font-family-asian="Arial" style:font-family-complex="Arial" fo:font-size="12pt" fo:font-weight="bold"/>
    </style:style>
    <style:style style:family="paragraph" style:name="P455">
      <style:paragraph-properties fo:line-height="115%" fo:margin-left="0cm" fo:margin-right="0cm" fo:text-indent="0cm" fo:margin-top="0pt" fo:margin-bottom="0pt" fo:border="none"/>
      <style:text-properties/>
    </style:style>
    <style:style style:family="text" style:name="T1156">
      <style:text-properties fo:color="#1f1f1f" fo:font-family="Arial" style:font-family-asian="Arial" style:font-family-complex="Arial" fo:font-size="12pt"/>
    </style:style>
    <style:style style:family="table" style:name="ta4">
      <style:paragraph-properties fo:line-height="100%" fo:margin-bottom="0pt"/>
      <style:table-properties style:width="11.43cm" fo:margin-left="0cm" table:align="left" style:use-optimal-column-width="true"/>
    </style:style>
    <style:style style:family="table-column" style:name="co9">
      <style:table-column-properties style:column-width="1.667cm" style:use-optimal-column-width="true"/>
    </style:style>
    <style:style style:family="table-column" style:name="co10">
      <style:table-column-properties style:column-width="4.742cm" style:use-optimal-column-width="true"/>
    </style:style>
    <style:style style:family="table-column" style:name="co11">
      <style:table-column-properties style:column-width="5.024cm" style:use-optimal-column-width="true"/>
    </style:style>
    <style:style style:family="table-row" style:name="ro11">
      <style:table-row-properties/>
    </style:style>
    <style:style style:family="table-cell" style:name="ce3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56">
      <style:paragraph-properties fo:line-height="100%" fo:margin-top="0pt" fo:margin-bottom="0pt"/>
      <style:text-properties/>
    </style:style>
    <style:style style:family="text" style:name="T1157">
      <style:text-properties fo:color="#1f1f1f" fo:font-family="Arial" style:font-family-asian="Arial" style:font-family-complex="Arial" fo:font-size="12pt" fo:font-weight="bold"/>
    </style:style>
    <style:style style:family="table-cell" style:name="ce3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57">
      <style:paragraph-properties fo:line-height="100%" fo:margin-top="0pt" fo:margin-bottom="0pt"/>
      <style:text-properties/>
    </style:style>
    <style:style style:family="text" style:name="T1158">
      <style:text-properties fo:color="#1f1f1f" fo:font-family="Arial" style:font-family-asian="Arial" style:font-family-complex="Arial" fo:font-size="12pt" fo:font-weight="bold"/>
    </style:style>
    <style:style style:family="table-cell" style:name="ce3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58">
      <style:paragraph-properties fo:line-height="100%" fo:margin-top="0pt" fo:margin-bottom="0pt"/>
      <style:text-properties/>
    </style:style>
    <style:style style:family="text" style:name="T1159">
      <style:text-properties fo:color="#1f1f1f" fo:font-family="Arial" style:font-family-asian="Arial" style:font-family-complex="Arial" fo:font-size="12pt" fo:font-weight="bold"/>
    </style:style>
    <style:style style:family="table-row" style:name="ro12">
      <style:table-row-properties/>
    </style:style>
    <style:style style:family="table-cell" style:name="ce3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59">
      <style:paragraph-properties fo:line-height="100%" fo:margin-top="0pt" fo:margin-bottom="0pt"/>
      <style:text-properties/>
    </style:style>
    <style:style style:family="text" style:name="T1160">
      <style:text-properties fo:color="#1f1f1f" fo:font-family="Arial" style:font-family-asian="Arial" style:font-family-complex="Arial" fo:font-size="12pt"/>
    </style:style>
    <style:style style:family="table-cell" style:name="ce3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0">
      <style:paragraph-properties fo:line-height="100%" fo:margin-top="0pt" fo:margin-bottom="0pt"/>
      <style:text-properties/>
    </style:style>
    <style:style style:family="text" style:name="T1161">
      <style:text-properties fo:color="#1f1f1f" fo:font-family="Arial" style:font-family-asian="Arial" style:font-family-complex="Arial" fo:font-size="12pt"/>
    </style:style>
    <style:style style:family="table-cell" style:name="ce3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1">
      <style:paragraph-properties fo:line-height="100%" fo:margin-top="0pt" fo:margin-bottom="0pt"/>
      <style:text-properties/>
    </style:style>
    <style:style style:family="text" style:name="T1162">
      <style:text-properties fo:color="#1f1f1f" fo:font-family="Arial" style:font-family-asian="Arial" style:font-family-complex="Arial" fo:font-size="12pt"/>
    </style:style>
    <style:style style:family="table-row" style:name="ro13">
      <style:table-row-properties/>
    </style:style>
    <style:style style:family="table-cell" style:name="ce3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2">
      <style:paragraph-properties fo:line-height="100%" fo:margin-top="0pt" fo:margin-bottom="0pt"/>
      <style:text-properties/>
    </style:style>
    <style:style style:family="text" style:name="T1163">
      <style:text-properties fo:color="#1f1f1f" fo:font-family="Arial" style:font-family-asian="Arial" style:font-family-complex="Arial" fo:font-size="12pt"/>
    </style:style>
    <style:style style:family="table-cell" style:name="ce3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3">
      <style:paragraph-properties fo:line-height="100%" fo:margin-top="0pt" fo:margin-bottom="0pt"/>
      <style:text-properties/>
    </style:style>
    <style:style style:family="text" style:name="T1164">
      <style:text-properties fo:color="#1f1f1f" fo:font-family="Arial" style:font-family-asian="Arial" style:font-family-complex="Arial" fo:font-size="12pt"/>
    </style:style>
    <style:style style:family="table-cell" style:name="ce3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4">
      <style:paragraph-properties fo:line-height="100%" fo:margin-top="0pt" fo:margin-bottom="0pt"/>
      <style:text-properties/>
    </style:style>
    <style:style style:family="text" style:name="T1165">
      <style:text-properties fo:color="#1f1f1f" fo:font-family="Arial" style:font-family-asian="Arial" style:font-family-complex="Arial" fo:font-size="12pt"/>
    </style:style>
    <style:style style:family="table-row" style:name="ro14">
      <style:table-row-properties/>
    </style:style>
    <style:style style:family="table-cell" style:name="ce4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5">
      <style:paragraph-properties fo:line-height="100%" fo:margin-top="0pt" fo:margin-bottom="0pt"/>
      <style:text-properties/>
    </style:style>
    <style:style style:family="text" style:name="T1166">
      <style:text-properties fo:color="#1f1f1f" fo:font-family="Arial" style:font-family-asian="Arial" style:font-family-complex="Arial" fo:font-size="12pt"/>
    </style:style>
    <style:style style:family="table-cell" style:name="ce4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6">
      <style:paragraph-properties fo:line-height="100%" fo:margin-top="0pt" fo:margin-bottom="0pt"/>
      <style:text-properties/>
    </style:style>
    <style:style style:family="text" style:name="T1167">
      <style:text-properties fo:color="#1f1f1f" fo:font-family="Arial" style:font-family-asian="Arial" style:font-family-complex="Arial" fo:font-size="12pt"/>
    </style:style>
    <style:style style:family="table-cell" style:name="ce4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67">
      <style:paragraph-properties fo:line-height="100%" fo:margin-top="0pt" fo:margin-bottom="0pt"/>
      <style:text-properties/>
    </style:style>
    <style:style style:family="text" style:name="T1168">
      <style:text-properties fo:color="#1f1f1f" fo:font-family="Arial" style:font-family-asian="Arial" style:font-family-complex="Arial" fo:font-size="12pt"/>
    </style:style>
    <style:style style:parent-style-name="949" style:family="paragraph" style:name="P4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69">
      <style:text-properties fo:color="#1f1f1f" fo:font-family="Arial" style:font-family-asian="Arial" style:font-family-complex="Arial" fo:font-size="14pt" fo:font-weight="bold"/>
    </style:style>
    <style:style style:parent-style-name="1010" style:list-style-name="WWNum34" style:family="paragraph" style:name="P469">
      <style:paragraph-properties fo:line-height="115%" fo:margin-right="0cm" fo:margin-top="0pt" fo:margin-bottom="0pt" fo:border="none"/>
      <style:text-properties/>
    </style:style>
    <style:style style:family="text" style:name="T1170">
      <style:text-properties fo:color="#1f1f1f" fo:font-family="Arial" style:font-family-asian="Arial" style:font-family-complex="Arial" fo:font-size="12pt"/>
    </style:style>
    <style:style style:parent-style-name="1010" style:list-style-name="WWNum34" style:family="paragraph" style:name="P470">
      <style:paragraph-properties fo:line-height="115%" fo:margin-right="0cm" fo:margin-top="0pt" fo:margin-bottom="0pt" fo:border="none"/>
      <style:text-properties/>
    </style:style>
    <style:style style:family="text" style:name="T1171">
      <style:text-properties fo:color="#1f1f1f" fo:font-family="Arial" style:font-family-asian="Arial" style:font-family-complex="Arial" fo:font-size="12pt"/>
    </style:style>
    <style:style style:parent-style-name="1010" style:list-style-name="WWNum34" style:family="paragraph" style:name="P471">
      <style:paragraph-properties fo:line-height="115%" fo:margin-right="0cm" fo:margin-top="0pt" fo:margin-bottom="0pt" fo:border="none"/>
      <style:text-properties/>
    </style:style>
    <style:style style:family="text" style:name="T1172">
      <style:text-properties fo:color="#1f1f1f" fo:font-family="Arial" style:font-family-asian="Arial" style:font-family-complex="Arial" fo:font-size="12pt"/>
    </style:style>
    <style:style style:parent-style-name="1010" style:list-style-name="WWNum34" style:family="paragraph" style:name="P472">
      <style:paragraph-properties fo:line-height="115%" fo:margin-right="0cm" fo:margin-top="0pt" fo:margin-bottom="0pt" fo:border="none"/>
      <style:text-properties/>
    </style:style>
    <style:style style:family="text" style:name="T1173">
      <style:text-properties fo:color="#1f1f1f" fo:font-family="Arial" style:font-family-asian="Arial" style:font-family-complex="Arial" fo:font-size="12pt"/>
    </style:style>
    <style:style style:family="paragraph" style:name="P473">
      <style:paragraph-properties/>
      <style:text-properties/>
    </style:style>
    <style:style style:family="paragraph" style:name="P474">
      <style:paragraph-properties fo:line-height="115%" fo:margin-left="0cm" fo:margin-right="0cm" fo:text-indent="0cm" fo:margin-top="0pt" fo:margin-bottom="0pt" fo:break-before="page" fo:border="none"/>
      <style:text-properties/>
    </style:style>
    <style:style style:family="text" style:name="T1174">
      <style:text-properties fo:color="#1f1f1f" fo:font-family="Arial" style:font-family-asian="Arial" style:font-family-complex="Arial" fo:font-size="12pt"/>
    </style:style>
    <style:style style:parent-style-name="949" style:family="paragraph" style:name="P47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75">
      <style:text-properties fo:color="#1f1f1f" fo:font-family="Arial" style:font-family-asian="Arial" style:font-family-complex="Arial" fo:font-size="14pt" fo:font-weight="bold"/>
    </style:style>
    <style:style style:family="paragraph" style:name="P476">
      <style:paragraph-properties fo:line-height="115%" fo:margin-left="0cm" fo:margin-right="0cm" fo:text-indent="0cm" fo:margin-top="0pt" fo:margin-bottom="0pt" fo:border="none"/>
      <style:text-properties/>
    </style:style>
    <style:style style:family="text" style:name="T1176">
      <style:text-properties fo:color="#1f1f1f" fo:font-family="Arial" style:font-family-asian="Arial" style:font-family-complex="Arial" fo:font-size="12pt"/>
    </style:style>
    <style:style style:parent-style-name="950" style:family="paragraph" style:name="P47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77">
      <style:text-properties fo:color="#1f1f1f" fo:font-family="Arial" style:font-family-asian="Arial" style:font-family-complex="Arial" fo:font-size="12pt" fo:font-weight="bold"/>
    </style:style>
    <style:style style:family="paragraph" style:name="P478">
      <style:paragraph-properties fo:line-height="115%" fo:margin-left="0cm" fo:margin-right="0cm" fo:text-indent="0cm" fo:margin-top="0pt" fo:margin-bottom="0pt" fo:border="none"/>
      <style:text-properties/>
    </style:style>
    <style:style style:family="text" style:name="T1178">
      <style:text-properties fo:color="#1f1f1f" fo:font-family="Arial" style:font-family-asian="Arial" style:font-family-complex="Arial" fo:font-size="12pt"/>
    </style:style>
    <style:style style:parent-style-name="950" style:family="paragraph" style:name="P47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79">
      <style:text-properties fo:color="#1f1f1f" fo:font-family="Arial" style:font-family-asian="Arial" style:font-family-complex="Arial" fo:font-size="12pt" fo:font-weight="bold"/>
    </style:style>
    <style:style style:family="table" style:name="ta5">
      <style:paragraph-properties fo:line-height="100%" fo:margin-bottom="0pt"/>
      <style:table-properties style:width="16.63cm" fo:margin-left="0cm" table:align="left" style:use-optimal-column-width="true"/>
    </style:style>
    <style:style style:family="table-column" style:name="co12">
      <style:table-column-properties style:column-width="3.346cm" style:use-optimal-column-width="true"/>
    </style:style>
    <style:style style:family="table-column" style:name="co13">
      <style:table-column-properties style:column-width="5.281cm" style:use-optimal-column-width="true"/>
    </style:style>
    <style:style style:family="table-column" style:name="co14">
      <style:table-column-properties style:column-width="8.005cm" style:use-optimal-column-width="true"/>
    </style:style>
    <style:style style:family="table-row" style:name="ro15">
      <style:table-row-properties/>
    </style:style>
    <style:style style:family="table-cell" style:name="ce4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80">
      <style:paragraph-properties fo:line-height="100%" fo:margin-top="0pt" fo:margin-bottom="0pt"/>
      <style:text-properties/>
    </style:style>
    <style:style style:family="text" style:name="T1180">
      <style:text-properties fo:color="#1f1f1f" fo:font-family="Arial" style:font-family-asian="Arial" style:font-family-complex="Arial" fo:font-size="12pt" fo:font-weight="bold"/>
    </style:style>
    <style:style style:family="table-cell" style:name="ce4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81">
      <style:paragraph-properties fo:line-height="100%" fo:margin-top="0pt" fo:margin-bottom="0pt"/>
      <style:text-properties/>
    </style:style>
    <style:style style:family="text" style:name="T1181">
      <style:text-properties fo:color="#1f1f1f" fo:font-family="Arial" style:font-family-asian="Arial" style:font-family-complex="Arial" fo:font-size="12pt" fo:font-weight="bold"/>
    </style:style>
    <style:style style:family="table-cell" style:name="ce4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82">
      <style:paragraph-properties fo:line-height="100%" fo:margin-top="0pt" fo:margin-bottom="0pt"/>
      <style:text-properties/>
    </style:style>
    <style:style style:family="text" style:name="T1182">
      <style:text-properties fo:color="#1f1f1f" fo:font-family="Arial" style:font-family-asian="Arial" style:font-family-complex="Arial" fo:font-size="12pt" fo:font-weight="bold"/>
    </style:style>
    <style:style style:family="table-row" style:name="ro16">
      <style:table-row-properties/>
    </style:style>
    <style:style style:family="table-cell" style:name="ce4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83">
      <style:paragraph-properties fo:line-height="100%" fo:margin-top="0pt" fo:margin-bottom="0pt"/>
      <style:text-properties/>
    </style:style>
    <style:style style:family="text" style:name="T1183">
      <style:text-properties fo:color="#1f1f1f" fo:font-family="Arial" style:font-family-asian="Arial" style:font-family-complex="Arial" fo:font-size="12pt"/>
    </style:style>
    <style:style style:family="table-cell" style:name="ce4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84">
      <style:paragraph-properties fo:line-height="100%" fo:margin-top="0pt" fo:margin-bottom="0pt"/>
      <style:text-properties/>
    </style:style>
    <style:style style:family="text" style:name="T1184">
      <style:text-properties fo:color="#1f1f1f" fo:font-family="Arial" style:font-family-asian="Arial" style:font-family-complex="Arial" fo:font-size="12pt"/>
    </style:style>
    <style:style style:family="table-cell" style:name="ce4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85">
      <style:paragraph-properties fo:line-height="100%" fo:margin-top="0pt" fo:margin-bottom="0pt"/>
      <style:text-properties/>
    </style:style>
    <style:style style:family="text" style:name="T1185">
      <style:text-properties fo:color="#1f1f1f" fo:font-family="Arial" style:font-family-asian="Arial" style:font-family-complex="Arial" fo:font-size="12pt"/>
    </style:style>
    <style:style style:parent-style-name="950" style:family="paragraph" style:name="P48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86">
      <style:text-properties fo:color="#1f1f1f" fo:font-family="Arial" style:font-family-asian="Arial" style:font-family-complex="Arial" fo:font-size="12pt" fo:font-weight="bold"/>
    </style:style>
    <style:style style:parent-style-name="1010" style:list-style-name="WWNum35" style:family="paragraph" style:name="P487">
      <style:paragraph-properties fo:line-height="115%" fo:margin-right="0cm" fo:margin-top="0pt" fo:margin-bottom="0pt" fo:border="none"/>
      <style:text-properties/>
    </style:style>
    <style:style style:family="text" style:name="T1187">
      <style:text-properties fo:color="#1f1f1f" fo:font-family="Arial" style:font-family-asian="Arial" style:font-family-complex="Arial" fo:font-size="12pt"/>
    </style:style>
    <style:style style:parent-style-name="1010" style:list-style-name="WWNum35" style:family="paragraph" style:name="P488">
      <style:paragraph-properties fo:line-height="115%" fo:margin-right="0cm" fo:margin-top="0pt" fo:margin-bottom="0pt" fo:border="none"/>
      <style:text-properties/>
    </style:style>
    <style:style style:family="text" style:name="T1188">
      <style:text-properties fo:color="#1f1f1f" fo:font-family="Arial" style:font-family-asian="Arial" style:font-family-complex="Arial" fo:font-size="12pt"/>
    </style:style>
    <style:style style:parent-style-name="1010" style:list-style-name="WWNum35" style:family="paragraph" style:name="P489">
      <style:paragraph-properties fo:line-height="115%" fo:margin-right="0cm" fo:margin-top="0pt" fo:margin-bottom="0pt" fo:border="none"/>
      <style:text-properties/>
    </style:style>
    <style:style style:family="text" style:name="T1189">
      <style:text-properties fo:color="#1f1f1f" fo:font-family="Arial" style:font-family-asian="Arial" style:font-family-complex="Arial" fo:font-size="12pt"/>
    </style:style>
    <style:style style:parent-style-name="950" style:family="paragraph" style:name="P49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0">
      <style:text-properties fo:color="#1f1f1f" fo:font-family="Arial" style:font-family-asian="Arial" style:font-family-complex="Arial" fo:font-size="12pt" fo:font-weight="bold"/>
    </style:style>
    <style:style style:family="paragraph" style:name="P491">
      <style:paragraph-properties fo:line-height="115%" fo:margin-left="0cm" fo:margin-right="0cm" fo:text-indent="0cm" fo:margin-top="0pt" fo:margin-bottom="0pt" fo:border="none"/>
      <style:text-properties/>
    </style:style>
    <style:style style:family="text" style:name="T1191">
      <style:text-properties fo:color="#1f1f1f" fo:font-family="Arial" style:font-family-asian="Arial" style:font-family-complex="Arial" fo:font-size="12pt"/>
    </style:style>
    <style:style style:parent-style-name="949" style:family="paragraph" style:name="P49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92">
      <style:text-properties fo:color="#1f1f1f" fo:font-family="Arial" style:font-family-asian="Arial" style:font-family-complex="Arial" fo:font-size="14pt" fo:font-weight="bold"/>
    </style:style>
    <style:style style:parent-style-name="1010" style:list-style-name="WWNum35" style:family="paragraph" style:name="P493">
      <style:paragraph-properties fo:line-height="115%" fo:margin-right="0cm" fo:margin-top="0pt" fo:margin-bottom="0pt" fo:border="none"/>
      <style:text-properties/>
    </style:style>
    <style:style style:family="text" style:name="T1193">
      <style:text-properties fo:color="#1f1f1f" fo:font-family="Arial" style:font-family-asian="Arial" style:font-family-complex="Arial" fo:font-size="12pt"/>
    </style:style>
    <style:style style:parent-style-name="1010" style:list-style-name="WWNum35" style:family="paragraph" style:name="P494">
      <style:paragraph-properties fo:line-height="115%" fo:margin-right="0cm" fo:margin-top="0pt" fo:margin-bottom="0pt" fo:border="none"/>
      <style:text-properties/>
    </style:style>
    <style:style style:family="text" style:name="T1194">
      <style:text-properties fo:color="#1f1f1f" fo:font-family="Arial" style:font-family-asian="Arial" style:font-family-complex="Arial" fo:font-size="12pt"/>
    </style:style>
    <style:style style:parent-style-name="1010" style:list-style-name="WWNum35" style:family="paragraph" style:name="P495">
      <style:paragraph-properties fo:line-height="115%" fo:margin-right="0cm" fo:margin-top="0pt" fo:margin-bottom="0pt" fo:border="none"/>
      <style:text-properties/>
    </style:style>
    <style:style style:family="text" style:name="T1195">
      <style:text-properties fo:color="#1f1f1f" fo:font-family="Arial" style:font-family-asian="Arial" style:font-family-complex="Arial" fo:font-size="12pt"/>
    </style:style>
    <style:style style:parent-style-name="1010" style:list-style-name="WWNum35" style:family="paragraph" style:name="P496">
      <style:paragraph-properties fo:line-height="115%" fo:margin-right="0cm" fo:margin-top="0pt" fo:margin-bottom="0pt" fo:border="none"/>
      <style:text-properties/>
    </style:style>
    <style:style style:family="text" style:name="T1196">
      <style:text-properties fo:color="#1f1f1f" fo:font-family="Arial" style:font-family-asian="Arial" style:font-family-complex="Arial" fo:font-size="12pt"/>
    </style:style>
    <style:style style:family="paragraph" style:name="P497">
      <style:paragraph-properties/>
      <style:text-properties/>
    </style:style>
    <style:style style:parent-style-name="949" style:family="paragraph" style:name="P49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97">
      <style:text-properties fo:color="#1f1f1f" fo:font-family="Arial" style:font-family-asian="Arial" style:font-family-complex="Arial" fo:font-size="14pt" fo:font-weight="bold"/>
    </style:style>
    <style:style style:family="paragraph" style:name="P499">
      <style:paragraph-properties fo:line-height="115%" fo:margin-left="0cm" fo:margin-right="0cm" fo:text-indent="0cm" fo:margin-top="0pt" fo:margin-bottom="0pt" fo:border="none"/>
      <style:text-properties/>
    </style:style>
    <style:style style:family="text" style:name="T1198">
      <style:text-properties fo:color="#1f1f1f" fo:font-family="Arial" style:font-family-asian="Arial" style:font-family-complex="Arial" fo:font-size="12pt"/>
    </style:style>
    <style:style style:parent-style-name="950" style:family="paragraph" style:name="P50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9">
      <style:text-properties fo:color="#1f1f1f" fo:font-family="Arial" style:font-family-asian="Arial" style:font-family-complex="Arial" fo:font-size="12pt" fo:font-weight="bold"/>
    </style:style>
    <style:style style:family="paragraph" style:name="P501">
      <style:paragraph-properties fo:line-height="115%" fo:margin-left="0cm" fo:margin-right="0cm" fo:text-indent="0cm" fo:margin-top="0pt" fo:margin-bottom="0pt" fo:border="none"/>
      <style:text-properties/>
    </style:style>
    <style:style style:family="text" style:name="T1200">
      <style:text-properties fo:color="#1f1f1f" fo:font-family="Arial" style:font-family-asian="Arial" style:font-family-complex="Arial" fo:font-size="12pt"/>
    </style:style>
    <style:style style:parent-style-name="950" style:family="paragraph" style:name="P50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01">
      <style:text-properties fo:color="#1f1f1f" fo:font-family="Arial" style:font-family-asian="Arial" style:font-family-complex="Arial" fo:font-size="12pt" fo:font-weight="bold"/>
    </style:style>
    <style:style style:family="paragraph" style:name="P503">
      <style:paragraph-properties fo:line-height="115%" fo:margin-left="0cm" fo:margin-right="0cm" fo:text-indent="0cm" fo:margin-top="0pt" fo:margin-bottom="0pt" fo:border="none"/>
      <style:text-properties/>
    </style:style>
    <style:style style:family="text" style:name="T1202">
      <style:text-properties fo:color="#1f1f1f" fo:font-family="Arial" style:font-family-asian="Arial" style:font-family-complex="Arial" fo:font-size="12pt"/>
    </style:style>
    <style:style style:parent-style-name="950" style:family="paragraph" style:name="P50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03">
      <style:text-properties fo:color="#1f1f1f" fo:font-family="Arial" style:font-family-asian="Arial" style:font-family-complex="Arial" fo:font-size="12pt" fo:font-weight="bold"/>
    </style:style>
    <style:style style:family="paragraph" style:name="P505">
      <style:paragraph-properties fo:line-height="115%" fo:margin-left="0cm" fo:margin-right="0cm" fo:text-indent="0cm" fo:margin-top="0pt" fo:margin-bottom="0pt" fo:border="none"/>
      <style:text-properties/>
    </style:style>
    <style:style style:family="text" style:name="T1204">
      <style:text-properties fo:color="#1f1f1f" fo:font-family="Arial" style:font-family-asian="Arial" style:font-family-complex="Arial" fo:font-size="12pt"/>
    </style:style>
    <style:style style:parent-style-name="950" style:family="paragraph" style:name="P50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05">
      <style:text-properties fo:color="#1f1f1f" fo:font-family="Arial" style:font-family-asian="Arial" style:font-family-complex="Arial" fo:font-size="12pt" fo:font-weight="bold"/>
    </style:style>
    <style:style style:family="paragraph" style:name="P507">
      <style:paragraph-properties fo:line-height="115%" fo:margin-left="0cm" fo:margin-right="0cm" fo:text-indent="0cm" fo:margin-top="0pt" fo:margin-bottom="0pt" fo:border="none"/>
      <style:text-properties/>
    </style:style>
    <style:style style:family="text" style:name="T1206">
      <style:text-properties fo:color="#1f1f1f" fo:font-family="Arial" style:font-family-asian="Arial" style:font-family-complex="Arial" fo:font-size="12pt"/>
    </style:style>
    <style:style style:parent-style-name="949" style:family="paragraph" style:name="P50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07">
      <style:text-properties fo:color="#1f1f1f" fo:font-family="Arial" style:font-family-asian="Arial" style:font-family-complex="Arial" fo:font-size="14pt" fo:font-weight="bold"/>
    </style:style>
    <style:style style:parent-style-name="1010" style:list-style-name="WWNum36" style:family="paragraph" style:name="P509">
      <style:paragraph-properties fo:line-height="115%" fo:margin-right="0cm" fo:margin-top="0pt" fo:margin-bottom="0pt" fo:border="none"/>
      <style:text-properties/>
    </style:style>
    <style:style style:family="text" style:name="T1208">
      <style:text-properties fo:color="#1f1f1f" fo:font-family="Arial" style:font-family-asian="Arial" style:font-family-complex="Arial" fo:font-size="12pt"/>
    </style:style>
    <style:style style:parent-style-name="1010" style:list-style-name="WWNum36" style:family="paragraph" style:name="P510">
      <style:paragraph-properties fo:line-height="115%" fo:margin-right="0cm" fo:margin-top="0pt" fo:margin-bottom="0pt" fo:border="none"/>
      <style:text-properties/>
    </style:style>
    <style:style style:family="text" style:name="T1209">
      <style:text-properties fo:color="#1f1f1f" fo:font-family="Arial" style:font-family-asian="Arial" style:font-family-complex="Arial" fo:font-size="12pt"/>
    </style:style>
    <style:style style:parent-style-name="1010" style:list-style-name="WWNum36" style:family="paragraph" style:name="P511">
      <style:paragraph-properties fo:line-height="115%" fo:margin-right="0cm" fo:margin-top="0pt" fo:margin-bottom="0pt" fo:border="none"/>
      <style:text-properties/>
    </style:style>
    <style:style style:family="text" style:name="T1210">
      <style:text-properties fo:color="#1f1f1f" fo:font-family="Arial" style:font-family-asian="Arial" style:font-family-complex="Arial" fo:font-size="12pt"/>
    </style:style>
    <style:style style:parent-style-name="1010" style:list-style-name="WWNum36" style:family="paragraph" style:name="P512">
      <style:paragraph-properties fo:line-height="115%" fo:margin-right="0cm" fo:margin-top="0pt" fo:margin-bottom="0pt" fo:border="none"/>
      <style:text-properties/>
    </style:style>
    <style:style style:family="text" style:name="T1211">
      <style:text-properties fo:color="#1f1f1f" fo:font-family="Arial" style:font-family-asian="Arial" style:font-family-complex="Arial" fo:font-size="12pt"/>
    </style:style>
    <style:style style:family="paragraph" style:name="P513">
      <style:paragraph-properties/>
      <style:text-properties/>
    </style:style>
    <style:style style:family="paragraph" style:name="P514">
      <style:paragraph-properties fo:line-height="115%" fo:margin-left="0cm" fo:margin-right="0cm" fo:text-indent="0cm" fo:margin-top="0pt" fo:margin-bottom="0pt" fo:break-before="page" fo:border="none"/>
      <style:text-properties/>
    </style:style>
    <style:style style:family="text" style:name="T1212">
      <style:text-properties fo:color="#1f1f1f" fo:font-family="Arial" style:font-family-asian="Arial" style:font-family-complex="Arial" fo:font-size="12pt"/>
    </style:style>
    <style:style style:parent-style-name="949" style:family="paragraph" style:name="P51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13">
      <style:text-properties fo:color="#1f1f1f" fo:font-family="Arial" style:font-family-asian="Arial" style:font-family-complex="Arial" fo:font-size="14pt" fo:font-weight="bold"/>
    </style:style>
    <style:style style:family="paragraph" style:name="P516">
      <style:paragraph-properties fo:line-height="115%" fo:margin-left="0cm" fo:margin-right="0cm" fo:text-indent="0cm" fo:margin-top="0pt" fo:margin-bottom="0pt" fo:border="none"/>
      <style:text-properties/>
    </style:style>
    <style:style style:family="text" style:name="T1214">
      <style:text-properties fo:color="#1f1f1f" fo:font-family="Arial" style:font-family-asian="Arial" style:font-family-complex="Arial" fo:font-size="12pt"/>
    </style:style>
    <style:style style:parent-style-name="950" style:family="paragraph" style:name="P51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15">
      <style:text-properties fo:color="#1f1f1f" fo:font-family="Arial" style:font-family-asian="Arial" style:font-family-complex="Arial" fo:font-size="12pt" fo:font-weight="bold"/>
    </style:style>
    <style:style style:family="paragraph" style:name="P518">
      <style:paragraph-properties fo:line-height="115%" fo:margin-left="0cm" fo:margin-right="0cm" fo:text-indent="0cm" fo:margin-top="0pt" fo:margin-bottom="0pt" fo:border="none"/>
      <style:text-properties/>
    </style:style>
    <style:style style:family="text" style:name="T1216">
      <style:text-properties fo:color="#1f1f1f" fo:font-family="Arial" style:font-family-asian="Arial" style:font-family-complex="Arial" fo:font-size="12pt"/>
    </style:style>
    <style:style style:parent-style-name="950" style:family="paragraph" style:name="P51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17">
      <style:text-properties fo:color="#1f1f1f" fo:font-family="Arial" style:font-family-asian="Arial" style:font-family-complex="Arial" fo:font-size="12pt" fo:font-weight="bold"/>
    </style:style>
    <style:style style:family="paragraph" style:name="P520">
      <style:paragraph-properties fo:line-height="115%" fo:margin-left="0cm" fo:margin-right="0cm" fo:text-indent="0cm" fo:margin-top="0pt" fo:margin-bottom="0pt" fo:border="none"/>
      <style:text-properties/>
    </style:style>
    <style:style style:family="text" style:name="T1218">
      <style:text-properties fo:color="#1f1f1f" fo:font-family="Arial" style:font-family-asian="Arial" style:font-family-complex="Arial" fo:font-size="12pt"/>
    </style:style>
    <style:style style:parent-style-name="950" style:family="paragraph" style:name="P52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19">
      <style:text-properties fo:color="#1f1f1f" fo:font-family="Arial" style:font-family-asian="Arial" style:font-family-complex="Arial" fo:font-size="12pt" fo:font-weight="bold"/>
    </style:style>
    <style:style style:family="paragraph" style:name="P522">
      <style:paragraph-properties fo:line-height="115%" fo:margin-left="0cm" fo:margin-right="0cm" fo:text-indent="0cm" fo:margin-top="0pt" fo:margin-bottom="0pt" fo:border="none"/>
      <style:text-properties/>
    </style:style>
    <style:style style:family="text" style:name="T1220">
      <style:text-properties fo:color="#1f1f1f" fo:font-family="Arial" style:font-family-asian="Arial" style:font-family-complex="Arial" fo:font-size="12pt"/>
    </style:style>
    <style:style style:parent-style-name="950" style:family="paragraph" style:name="P52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21">
      <style:text-properties fo:color="#1f1f1f" fo:font-family="Arial" style:font-family-asian="Arial" style:font-family-complex="Arial" fo:font-size="12pt" fo:font-weight="bold"/>
    </style:style>
    <style:style style:family="paragraph" style:name="P524">
      <style:paragraph-properties fo:line-height="115%" fo:margin-left="0cm" fo:margin-right="0cm" fo:text-indent="0cm" fo:margin-top="0pt" fo:margin-bottom="0pt" fo:border="none"/>
      <style:text-properties/>
    </style:style>
    <style:style style:family="text" style:name="T1222">
      <style:text-properties fo:color="#1f1f1f" fo:font-family="Arial" style:font-family-asian="Arial" style:font-family-complex="Arial" fo:font-size="12pt"/>
    </style:style>
    <style:style style:parent-style-name="949" style:family="paragraph" style:name="P52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23">
      <style:text-properties fo:color="#1f1f1f" fo:font-family="Arial" style:font-family-asian="Arial" style:font-family-complex="Arial" fo:font-size="14pt" fo:font-weight="bold"/>
    </style:style>
    <style:style style:parent-style-name="1010" style:list-style-name="WWNum37" style:family="paragraph" style:name="P526">
      <style:paragraph-properties fo:line-height="115%" fo:margin-right="0cm" fo:margin-top="0pt" fo:margin-bottom="0pt" fo:border="none"/>
      <style:text-properties/>
    </style:style>
    <style:style style:family="text" style:name="T1224">
      <style:text-properties fo:color="#1f1f1f" fo:font-family="Arial" style:font-family-asian="Arial" style:font-family-complex="Arial" fo:font-size="12pt"/>
    </style:style>
    <style:style style:parent-style-name="1010" style:list-style-name="WWNum37" style:family="paragraph" style:name="P527">
      <style:paragraph-properties fo:line-height="115%" fo:margin-right="0cm" fo:margin-top="0pt" fo:margin-bottom="0pt" fo:border="none"/>
      <style:text-properties/>
    </style:style>
    <style:style style:family="text" style:name="T1225">
      <style:text-properties fo:color="#1f1f1f" fo:font-family="Arial" style:font-family-asian="Arial" style:font-family-complex="Arial" fo:font-size="12pt"/>
    </style:style>
    <style:style style:parent-style-name="1010" style:list-style-name="WWNum37" style:family="paragraph" style:name="P528">
      <style:paragraph-properties fo:line-height="115%" fo:margin-right="0cm" fo:margin-top="0pt" fo:margin-bottom="0pt" fo:border="none"/>
      <style:text-properties/>
    </style:style>
    <style:style style:family="text" style:name="T1226">
      <style:text-properties fo:color="#1f1f1f" fo:font-family="Arial" style:font-family-asian="Arial" style:font-family-complex="Arial" fo:font-size="12pt"/>
    </style:style>
    <style:style style:parent-style-name="1010" style:list-style-name="WWNum37" style:family="paragraph" style:name="P529">
      <style:paragraph-properties fo:line-height="115%" fo:margin-right="0cm" fo:margin-top="0pt" fo:margin-bottom="0pt" fo:border="none"/>
      <style:text-properties/>
    </style:style>
    <style:style style:family="text" style:name="T1227">
      <style:text-properties fo:color="#1f1f1f" fo:font-family="Arial" style:font-family-asian="Arial" style:font-family-complex="Arial" fo:font-size="12pt"/>
    </style:style>
    <style:style style:family="paragraph" style:name="P530">
      <style:paragraph-properties/>
      <style:text-properties/>
    </style:style>
    <style:style style:family="paragraph" style:name="P531">
      <style:paragraph-properties fo:line-height="115%" fo:margin-left="0cm" fo:margin-right="0cm" fo:text-indent="0cm" fo:margin-top="0pt" fo:margin-bottom="0pt" fo:break-before="page" fo:border="none"/>
      <style:text-properties/>
    </style:style>
    <style:style style:family="text" style:name="T1228">
      <style:text-properties fo:color="#1f1f1f" fo:font-family="Arial" style:font-family-asian="Arial" style:font-family-complex="Arial" fo:font-size="12pt"/>
    </style:style>
    <style:style style:parent-style-name="949" style:family="paragraph" style:name="P53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29">
      <style:text-properties fo:color="#1f1f1f" fo:font-family="Arial" style:font-family-asian="Arial" style:font-family-complex="Arial" fo:font-size="14pt" fo:font-weight="bold"/>
    </style:style>
    <style:style style:family="paragraph" style:name="P533">
      <style:paragraph-properties fo:line-height="115%" fo:margin-left="0cm" fo:margin-right="0cm" fo:text-indent="0cm" fo:margin-top="0pt" fo:margin-bottom="0pt" fo:border="none"/>
      <style:text-properties/>
    </style:style>
    <style:style style:family="text" style:name="T1230">
      <style:text-properties fo:color="#1f1f1f" fo:font-family="Arial" style:font-family-asian="Arial" style:font-family-complex="Arial" fo:font-size="12pt"/>
    </style:style>
    <style:style style:parent-style-name="950" style:family="paragraph" style:name="P53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1">
      <style:text-properties fo:color="#1f1f1f" fo:font-family="Arial" style:font-family-asian="Arial" style:font-family-complex="Arial" fo:font-size="12pt" fo:font-weight="bold"/>
    </style:style>
    <style:style style:family="paragraph" style:name="P535">
      <style:paragraph-properties fo:line-height="115%" fo:margin-left="0cm" fo:margin-right="0cm" fo:text-indent="0cm" fo:margin-top="0pt" fo:margin-bottom="0pt" fo:border="none"/>
      <style:text-properties/>
    </style:style>
    <style:style style:family="text" style:name="T1232">
      <style:text-properties fo:color="#1f1f1f" fo:font-family="Arial" style:font-family-asian="Arial" style:font-family-complex="Arial" fo:font-size="12pt"/>
    </style:style>
    <style:style style:parent-style-name="950" style:family="paragraph" style:name="P5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3">
      <style:text-properties fo:color="#1f1f1f" fo:font-family="Arial" style:font-family-asian="Arial" style:font-family-complex="Arial" fo:font-size="12pt" fo:font-weight="bold"/>
    </style:style>
    <style:style style:family="paragraph" style:name="P537">
      <style:paragraph-properties fo:line-height="115%" fo:margin-left="0cm" fo:margin-right="0cm" fo:text-indent="0cm" fo:margin-top="0pt" fo:margin-bottom="0pt" fo:border="none"/>
      <style:text-properties/>
    </style:style>
    <style:style style:family="text" style:name="T1234">
      <style:text-properties fo:color="#1f1f1f" fo:font-family="Arial" style:font-family-asian="Arial" style:font-family-complex="Arial" fo:font-size="12pt"/>
    </style:style>
    <style:style style:parent-style-name="950" style:family="paragraph" style:name="P5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5">
      <style:text-properties fo:color="#1f1f1f" fo:font-family="Arial" style:font-family-asian="Arial" style:font-family-complex="Arial" fo:font-size="12pt" fo:font-weight="bold"/>
    </style:style>
    <style:style style:family="paragraph" style:name="P539">
      <style:paragraph-properties fo:line-height="115%" fo:margin-left="0cm" fo:margin-right="0cm" fo:text-indent="0cm" fo:margin-top="0pt" fo:margin-bottom="0pt" fo:border="none"/>
      <style:text-properties/>
    </style:style>
    <style:style style:family="text" style:name="T1236">
      <style:text-properties fo:color="#1f1f1f" fo:font-family="Arial" style:font-family-asian="Arial" style:font-family-complex="Arial" fo:font-size="12pt"/>
    </style:style>
    <style:style style:parent-style-name="950" style:family="paragraph" style:name="P5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7">
      <style:text-properties fo:color="#1f1f1f" fo:font-family="Arial" style:font-family-asian="Arial" style:font-family-complex="Arial" fo:font-size="12pt" fo:font-weight="bold"/>
    </style:style>
    <style:style style:family="paragraph" style:name="P541">
      <style:paragraph-properties fo:line-height="115%" fo:margin-left="0cm" fo:margin-right="0cm" fo:text-indent="0cm" fo:margin-top="0pt" fo:margin-bottom="0pt" fo:border="none"/>
      <style:text-properties/>
    </style:style>
    <style:style style:family="text" style:name="T1238">
      <style:text-properties fo:color="#1f1f1f" fo:font-family="Arial" style:font-family-asian="Arial" style:font-family-complex="Arial" fo:font-size="12pt"/>
    </style:style>
    <style:style style:parent-style-name="949" style:family="paragraph" style:name="P54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39">
      <style:text-properties fo:color="#1f1f1f" fo:font-family="Arial" style:font-family-asian="Arial" style:font-family-complex="Arial" fo:font-size="14pt" fo:font-weight="bold"/>
    </style:style>
    <style:style style:parent-style-name="1010" style:list-style-name="WWNum38" style:family="paragraph" style:name="P543">
      <style:paragraph-properties fo:line-height="115%" fo:margin-right="0cm" fo:margin-top="0pt" fo:margin-bottom="0pt" fo:border="none"/>
      <style:text-properties/>
    </style:style>
    <style:style style:family="text" style:name="T1240">
      <style:text-properties fo:color="#1f1f1f" fo:font-family="Arial" style:font-family-asian="Arial" style:font-family-complex="Arial" fo:font-size="12pt"/>
    </style:style>
    <style:style style:parent-style-name="1010" style:list-style-name="WWNum38" style:family="paragraph" style:name="P544">
      <style:paragraph-properties fo:line-height="115%" fo:margin-right="0cm" fo:margin-top="0pt" fo:margin-bottom="0pt" fo:border="none"/>
      <style:text-properties/>
    </style:style>
    <style:style style:family="text" style:name="T1241">
      <style:text-properties fo:color="#1f1f1f" fo:font-family="Arial" style:font-family-asian="Arial" style:font-family-complex="Arial" fo:font-size="12pt"/>
    </style:style>
    <style:style style:parent-style-name="1010" style:list-style-name="WWNum38" style:family="paragraph" style:name="P545">
      <style:paragraph-properties fo:line-height="115%" fo:margin-right="0cm" fo:margin-top="0pt" fo:margin-bottom="0pt" fo:border="none"/>
      <style:text-properties/>
    </style:style>
    <style:style style:family="text" style:name="T1242">
      <style:text-properties fo:color="#1f1f1f" fo:font-family="Arial" style:font-family-asian="Arial" style:font-family-complex="Arial" fo:font-size="12pt"/>
    </style:style>
    <style:style style:parent-style-name="1010" style:list-style-name="WWNum38" style:family="paragraph" style:name="P546">
      <style:paragraph-properties fo:line-height="115%" fo:margin-right="0cm" fo:margin-top="0pt" fo:margin-bottom="0pt" fo:border="none"/>
      <style:text-properties/>
    </style:style>
    <style:style style:family="text" style:name="T1243">
      <style:text-properties fo:color="#1f1f1f" fo:font-family="Arial" style:font-family-asian="Arial" style:font-family-complex="Arial" fo:font-size="12pt"/>
    </style:style>
    <style:style style:family="paragraph" style:name="P547">
      <style:paragraph-properties/>
      <style:text-properties/>
    </style:style>
    <style:style style:parent-style-name="949" style:family="paragraph" style:name="P54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44">
      <style:text-properties fo:color="#1f1f1f" fo:font-family="Arial" style:font-family-asian="Arial" style:font-family-complex="Arial" fo:font-size="14pt" fo:font-weight="bold"/>
    </style:style>
    <style:style style:family="paragraph" style:name="P549">
      <style:paragraph-properties fo:line-height="115%" fo:margin-left="0cm" fo:margin-right="0cm" fo:text-indent="0cm" fo:margin-top="0pt" fo:margin-bottom="0pt" fo:border="none"/>
      <style:text-properties/>
    </style:style>
    <style:style style:family="text" style:name="T1245">
      <style:text-properties fo:color="#1f1f1f" fo:font-family="Arial" style:font-family-asian="Arial" style:font-family-complex="Arial" fo:font-size="12pt"/>
    </style:style>
    <style:style style:parent-style-name="950" style:family="paragraph" style:name="P5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46">
      <style:text-properties fo:color="#1f1f1f" fo:font-family="Arial" style:font-family-asian="Arial" style:font-family-complex="Arial" fo:font-size="12pt" fo:font-weight="bold"/>
    </style:style>
    <style:style style:family="paragraph" style:name="P551">
      <style:paragraph-properties fo:line-height="115%" fo:margin-left="0cm" fo:margin-right="0cm" fo:text-indent="0cm" fo:margin-top="0pt" fo:margin-bottom="0pt" fo:border="none"/>
      <style:text-properties/>
    </style:style>
    <style:style style:family="text" style:name="T1247">
      <style:text-properties fo:color="#1f1f1f" fo:font-family="Arial" style:font-family-asian="Arial" style:font-family-complex="Arial" fo:font-size="12pt"/>
    </style:style>
    <style:style style:parent-style-name="950" style:family="paragraph" style:name="P5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48">
      <style:text-properties fo:color="#1f1f1f" fo:font-family="Arial" style:font-family-asian="Arial" style:font-family-complex="Arial" fo:font-size="12pt" fo:font-weight="bold"/>
    </style:style>
    <style:style style:family="paragraph" style:name="P553">
      <style:paragraph-properties fo:line-height="115%" fo:margin-left="0cm" fo:margin-right="0cm" fo:text-indent="0cm" fo:margin-top="0pt" fo:margin-bottom="0pt" fo:border="none"/>
      <style:text-properties/>
    </style:style>
    <style:style style:family="text" style:name="T1249">
      <style:text-properties fo:color="#1f1f1f" fo:font-family="Arial" style:font-family-asian="Arial" style:font-family-complex="Arial" fo:font-size="12pt"/>
    </style:style>
    <style:style style:parent-style-name="950" style:family="paragraph" style:name="P5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50">
      <style:text-properties fo:color="#1f1f1f" fo:font-family="Arial" style:font-family-asian="Arial" style:font-family-complex="Arial" fo:font-size="12pt" fo:font-weight="bold"/>
    </style:style>
    <style:style style:family="paragraph" style:name="P555">
      <style:paragraph-properties fo:line-height="115%" fo:margin-left="0cm" fo:margin-right="0cm" fo:text-indent="0cm" fo:margin-top="0pt" fo:margin-bottom="0pt" fo:border="none"/>
      <style:text-properties/>
    </style:style>
    <style:style style:family="text" style:name="T1251">
      <style:text-properties fo:color="#1f1f1f" fo:font-family="Arial" style:font-family-asian="Arial" style:font-family-complex="Arial" fo:font-size="12pt"/>
    </style:style>
    <style:style style:parent-style-name="950" style:family="paragraph" style:name="P5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52">
      <style:text-properties fo:color="#1f1f1f" fo:font-family="Arial" style:font-family-asian="Arial" style:font-family-complex="Arial" fo:font-size="12pt" fo:font-weight="bold"/>
    </style:style>
    <style:style style:family="paragraph" style:name="P557">
      <style:paragraph-properties fo:line-height="115%" fo:margin-left="0cm" fo:margin-right="0cm" fo:text-indent="0cm" fo:margin-top="0pt" fo:margin-bottom="0pt" fo:border="none"/>
      <style:text-properties/>
    </style:style>
    <style:style style:family="text" style:name="T1253">
      <style:text-properties fo:color="#1f1f1f" fo:font-family="Arial" style:font-family-asian="Arial" style:font-family-complex="Arial" fo:font-size="12pt"/>
    </style:style>
    <style:style style:parent-style-name="949" style:family="paragraph" style:name="P55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54">
      <style:text-properties fo:color="#1f1f1f" fo:font-family="Arial" style:font-family-asian="Arial" style:font-family-complex="Arial" fo:font-size="14pt" fo:font-weight="bold"/>
    </style:style>
    <style:style style:parent-style-name="1010" style:list-style-name="WWNum39" style:family="paragraph" style:name="P559">
      <style:paragraph-properties fo:line-height="115%" fo:margin-right="0cm" fo:margin-top="0pt" fo:margin-bottom="0pt" fo:border="none"/>
      <style:text-properties/>
    </style:style>
    <style:style style:family="text" style:name="T1255">
      <style:text-properties fo:color="#1f1f1f" fo:font-family="Arial" style:font-family-asian="Arial" style:font-family-complex="Arial" fo:font-size="12pt"/>
    </style:style>
    <style:style style:parent-style-name="1010" style:list-style-name="WWNum39" style:family="paragraph" style:name="P560">
      <style:paragraph-properties fo:line-height="115%" fo:margin-right="0cm" fo:margin-top="0pt" fo:margin-bottom="0pt" fo:border="none"/>
      <style:text-properties/>
    </style:style>
    <style:style style:family="text" style:name="T1256">
      <style:text-properties fo:color="#1f1f1f" fo:font-family="Arial" style:font-family-asian="Arial" style:font-family-complex="Arial" fo:font-size="12pt"/>
    </style:style>
    <style:style style:parent-style-name="1010" style:list-style-name="WWNum39" style:family="paragraph" style:name="P561">
      <style:paragraph-properties fo:line-height="115%" fo:margin-right="0cm" fo:margin-top="0pt" fo:margin-bottom="0pt" fo:border="none"/>
      <style:text-properties/>
    </style:style>
    <style:style style:family="text" style:name="T1257">
      <style:text-properties fo:color="#1f1f1f" fo:font-family="Arial" style:font-family-asian="Arial" style:font-family-complex="Arial" fo:font-size="12pt"/>
    </style:style>
    <style:style style:parent-style-name="1010" style:list-style-name="WWNum39" style:family="paragraph" style:name="P562">
      <style:paragraph-properties fo:line-height="115%" fo:margin-right="0cm" fo:margin-top="0pt" fo:margin-bottom="0pt" fo:border="none"/>
      <style:text-properties/>
    </style:style>
    <style:style style:family="text" style:name="T1258">
      <style:text-properties fo:color="#1f1f1f" fo:font-family="Arial" style:font-family-asian="Arial" style:font-family-complex="Arial" fo:font-size="12pt"/>
    </style:style>
    <style:style style:family="paragraph" style:name="P563">
      <style:paragraph-properties/>
      <style:text-properties/>
    </style:style>
    <style:style style:parent-style-name="949" style:family="paragraph" style:name="P56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59">
      <style:text-properties fo:color="#1f1f1f" fo:font-family="Arial" style:font-family-asian="Arial" style:font-family-complex="Arial" fo:font-size="14pt" fo:font-weight="bold"/>
    </style:style>
    <style:style style:family="paragraph" style:name="P565">
      <style:paragraph-properties fo:line-height="115%" fo:margin-left="0cm" fo:margin-right="0cm" fo:text-indent="0cm" fo:margin-top="0pt" fo:margin-bottom="0pt" fo:border="none"/>
      <style:text-properties/>
    </style:style>
    <style:style style:family="text" style:name="T1260">
      <style:text-properties fo:color="#1f1f1f" fo:font-family="Arial" style:font-family-asian="Arial" style:font-family-complex="Arial" fo:font-size="12pt"/>
    </style:style>
    <style:style style:parent-style-name="950" style:family="paragraph" style:name="P5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1">
      <style:text-properties fo:color="#1f1f1f" fo:font-family="Arial" style:font-family-asian="Arial" style:font-family-complex="Arial" fo:font-size="12pt" fo:font-weight="bold"/>
    </style:style>
    <style:style style:family="paragraph" style:name="P567">
      <style:paragraph-properties fo:line-height="115%" fo:margin-left="0cm" fo:margin-right="0cm" fo:text-indent="0cm" fo:margin-top="0pt" fo:margin-bottom="0pt" fo:border="none"/>
      <style:text-properties/>
    </style:style>
    <style:style style:family="text" style:name="T1262">
      <style:text-properties fo:color="#1f1f1f" fo:font-family="Arial" style:font-family-asian="Arial" style:font-family-complex="Arial" fo:font-size="12pt"/>
    </style:style>
    <style:style style:family="text" style:name="T1263">
      <style:text-properties fo:color="#1f1f1f" fo:font-family="Arial" style:font-family-asian="Arial" style:font-family-complex="Arial" fo:font-size="12pt"/>
    </style:style>
    <style:style style:parent-style-name="950" style:family="paragraph" style:name="P5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4">
      <style:text-properties fo:color="#1f1f1f" fo:font-family="Arial" style:font-family-asian="Arial" style:font-family-complex="Arial" fo:font-size="12pt" fo:font-weight="bold"/>
    </style:style>
    <style:style style:family="paragraph" style:name="P569">
      <style:paragraph-properties fo:line-height="115%" fo:margin-left="0cm" fo:margin-right="0cm" fo:text-indent="0cm" fo:margin-top="0pt" fo:margin-bottom="0pt" fo:border="none"/>
      <style:text-properties/>
    </style:style>
    <style:style style:family="text" style:name="T1265">
      <style:text-properties fo:color="#1f1f1f" fo:font-family="Arial" style:font-family-asian="Arial" style:font-family-complex="Arial" fo:font-size="12pt"/>
    </style:style>
    <style:style style:parent-style-name="950" style:family="paragraph" style:name="P5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6">
      <style:text-properties fo:color="#1f1f1f" fo:font-family="Arial" style:font-family-asian="Arial" style:font-family-complex="Arial" fo:font-size="12pt" fo:font-weight="bold"/>
    </style:style>
    <style:style style:family="paragraph" style:name="P571">
      <style:paragraph-properties fo:line-height="115%" fo:margin-left="0cm" fo:margin-right="0cm" fo:text-indent="0cm" fo:margin-top="0pt" fo:margin-bottom="0pt" fo:border="none"/>
      <style:text-properties/>
    </style:style>
    <style:style style:family="text" style:name="T1267">
      <style:text-properties fo:color="#1f1f1f" fo:font-family="Arial" style:font-family-asian="Arial" style:font-family-complex="Arial" fo:font-size="12pt"/>
    </style:style>
    <style:style style:parent-style-name="950" style:family="paragraph" style:name="P5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8">
      <style:text-properties fo:color="#1f1f1f" fo:font-family="Arial" style:font-family-asian="Arial" style:font-family-complex="Arial" fo:font-size="12pt" fo:font-weight="bold"/>
    </style:style>
    <style:style style:family="paragraph" style:name="P573">
      <style:paragraph-properties fo:line-height="115%" fo:margin-left="0cm" fo:margin-right="0cm" fo:text-indent="0cm" fo:margin-top="0pt" fo:margin-bottom="0pt" fo:border="none"/>
      <style:text-properties/>
    </style:style>
    <style:style style:family="text" style:name="T1269">
      <style:text-properties fo:color="#1f1f1f" fo:font-family="Arial" style:font-family-asian="Arial" style:font-family-complex="Arial" fo:font-size="12pt"/>
    </style:style>
    <style:style style:parent-style-name="949" style:family="paragraph" style:name="P57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70">
      <style:text-properties fo:color="#1f1f1f" fo:font-family="Arial" style:font-family-asian="Arial" style:font-family-complex="Arial" fo:font-size="14pt" fo:font-weight="bold"/>
    </style:style>
    <style:style style:parent-style-name="1010" style:list-style-name="WWNum40" style:family="paragraph" style:name="P575">
      <style:paragraph-properties fo:line-height="115%" fo:margin-right="0cm" fo:margin-top="0pt" fo:margin-bottom="0pt" fo:border="none"/>
      <style:text-properties/>
    </style:style>
    <style:style style:family="text" style:name="T1271">
      <style:text-properties fo:color="#1f1f1f" fo:font-family="Arial" style:font-family-asian="Arial" style:font-family-complex="Arial" fo:font-size="12pt"/>
    </style:style>
    <style:style style:parent-style-name="1010" style:list-style-name="WWNum40" style:family="paragraph" style:name="P576">
      <style:paragraph-properties fo:line-height="115%" fo:margin-right="0cm" fo:margin-top="0pt" fo:margin-bottom="0pt" fo:border="none"/>
      <style:text-properties/>
    </style:style>
    <style:style style:family="text" style:name="T1272">
      <style:text-properties fo:color="#1f1f1f" fo:font-family="Arial" style:font-family-asian="Arial" style:font-family-complex="Arial" fo:font-size="12pt"/>
    </style:style>
    <style:style style:parent-style-name="1010" style:list-style-name="WWNum40" style:family="paragraph" style:name="P577">
      <style:paragraph-properties fo:line-height="115%" fo:margin-right="0cm" fo:margin-top="0pt" fo:margin-bottom="0pt" fo:border="none"/>
      <style:text-properties/>
    </style:style>
    <style:style style:family="text" style:name="T1273">
      <style:text-properties fo:color="#1f1f1f" fo:font-family="Arial" style:font-family-asian="Arial" style:font-family-complex="Arial" fo:font-size="12pt"/>
    </style:style>
    <style:style style:parent-style-name="1010" style:list-style-name="WWNum40" style:family="paragraph" style:name="P578">
      <style:paragraph-properties fo:line-height="115%" fo:margin-right="0cm" fo:margin-top="0pt" fo:margin-bottom="0pt" fo:border="none"/>
      <style:text-properties/>
    </style:style>
    <style:style style:family="text" style:name="T1274">
      <style:text-properties fo:color="#1f1f1f" fo:font-family="Arial" style:font-family-asian="Arial" style:font-family-complex="Arial" fo:font-size="12pt"/>
    </style:style>
    <style:style style:family="paragraph" style:name="P579">
      <style:paragraph-properties/>
      <style:text-properties/>
    </style:style>
    <style:style style:family="paragraph" style:name="P580">
      <style:paragraph-properties fo:line-height="115%" fo:margin-left="0cm" fo:margin-right="0cm" fo:text-indent="0cm" fo:margin-top="0pt" fo:margin-bottom="0pt" fo:break-before="page" fo:border="none"/>
      <style:text-properties/>
    </style:style>
    <style:style style:family="text" style:name="T1275">
      <style:text-properties fo:color="#1f1f1f" fo:font-family="Arial" style:font-family-asian="Arial" style:font-family-complex="Arial" fo:font-size="12pt"/>
    </style:style>
    <style:style style:parent-style-name="949" style:family="paragraph" style:name="P58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76">
      <style:text-properties fo:color="#1f1f1f" fo:font-family="Arial" style:font-family-asian="Arial" style:font-family-complex="Arial" fo:font-size="14pt" fo:font-weight="bold"/>
    </style:style>
    <style:style style:family="paragraph" style:name="P582">
      <style:paragraph-properties fo:line-height="115%" fo:margin-left="0cm" fo:margin-right="0cm" fo:text-indent="0cm" fo:margin-top="0pt" fo:margin-bottom="0pt" fo:border="none"/>
      <style:text-properties/>
    </style:style>
    <style:style style:family="text" style:name="T1277">
      <style:text-properties fo:color="#1f1f1f" fo:font-family="Arial" style:font-family-asian="Arial" style:font-family-complex="Arial" fo:font-size="12pt"/>
    </style:style>
    <style:style style:parent-style-name="950" style:family="paragraph" style:name="P58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78">
      <style:text-properties fo:color="#1f1f1f" fo:font-family="Arial" style:font-family-asian="Arial" style:font-family-complex="Arial" fo:font-size="12pt" fo:font-weight="bold"/>
    </style:style>
    <style:style style:family="paragraph" style:name="P584">
      <style:paragraph-properties fo:line-height="115%" fo:margin-left="0cm" fo:margin-right="0cm" fo:text-indent="0cm" fo:margin-top="0pt" fo:margin-bottom="0pt" fo:border="none"/>
      <style:text-properties/>
    </style:style>
    <style:style style:family="text" style:name="T1279">
      <style:text-properties fo:color="#1f1f1f" fo:font-family="Arial" style:font-family-asian="Arial" style:font-family-complex="Arial" fo:font-size="12pt"/>
    </style:style>
    <style:style style:parent-style-name="950" style:family="paragraph" style:name="P5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80">
      <style:text-properties fo:color="#1f1f1f" fo:font-family="Arial" style:font-family-asian="Arial" style:font-family-complex="Arial" fo:font-size="12pt" fo:font-weight="bold"/>
    </style:style>
    <style:style style:family="paragraph" style:name="P586">
      <style:paragraph-properties fo:line-height="115%" fo:margin-left="0cm" fo:margin-right="0cm" fo:text-indent="0cm" fo:margin-top="0pt" fo:margin-bottom="0pt" fo:border="none"/>
      <style:text-properties/>
    </style:style>
    <style:style style:family="text" style:name="T1281">
      <style:text-properties fo:color="#1f1f1f" fo:font-family="Arial" style:font-family-asian="Arial" style:font-family-complex="Arial" fo:font-size="12pt"/>
    </style:style>
    <style:style style:parent-style-name="950" style:family="paragraph" style:name="P58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82">
      <style:text-properties fo:color="#1f1f1f" fo:font-family="Arial" style:font-family-asian="Arial" style:font-family-complex="Arial" fo:font-size="12pt" fo:font-weight="bold"/>
    </style:style>
    <style:style style:family="paragraph" style:name="P588">
      <style:paragraph-properties fo:line-height="115%" fo:margin-left="0cm" fo:margin-right="0cm" fo:text-indent="0cm" fo:margin-top="0pt" fo:margin-bottom="0pt" fo:border="none"/>
      <style:text-properties/>
    </style:style>
    <style:style style:family="text" style:name="T1283">
      <style:text-properties fo:color="#1f1f1f" fo:font-family="Arial" style:font-family-asian="Arial" style:font-family-complex="Arial" fo:font-size="12pt"/>
    </style:style>
    <style:style style:parent-style-name="950" style:family="paragraph" style:name="P5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84">
      <style:text-properties fo:color="#1f1f1f" fo:font-family="Arial" style:font-family-asian="Arial" style:font-family-complex="Arial" fo:font-size="12pt" fo:font-weight="bold"/>
    </style:style>
    <style:style style:family="paragraph" style:name="P590">
      <style:paragraph-properties fo:line-height="115%" fo:margin-left="0cm" fo:margin-right="0cm" fo:text-indent="0cm" fo:margin-top="0pt" fo:margin-bottom="0pt" fo:border="none"/>
      <style:text-properties/>
    </style:style>
    <style:style style:family="text" style:name="T1285">
      <style:text-properties fo:color="#1f1f1f" fo:font-family="Arial" style:font-family-asian="Arial" style:font-family-complex="Arial" fo:font-size="12pt"/>
    </style:style>
    <style:style style:parent-style-name="949" style:family="paragraph" style:name="P59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86">
      <style:text-properties fo:color="#1f1f1f" fo:font-family="Arial" style:font-family-asian="Arial" style:font-family-complex="Arial" fo:font-size="14pt" fo:font-weight="bold"/>
    </style:style>
    <style:style style:parent-style-name="1010" style:list-style-name="WWNum41" style:family="paragraph" style:name="P592">
      <style:paragraph-properties fo:line-height="115%" fo:margin-right="0cm" fo:margin-top="0pt" fo:margin-bottom="0pt" fo:border="none"/>
      <style:text-properties/>
    </style:style>
    <style:style style:family="text" style:name="T1287">
      <style:text-properties fo:color="#1f1f1f" fo:font-family="Arial" style:font-family-asian="Arial" style:font-family-complex="Arial" fo:font-size="12pt"/>
    </style:style>
    <style:style style:parent-style-name="1010" style:list-style-name="WWNum41" style:family="paragraph" style:name="P593">
      <style:paragraph-properties fo:line-height="115%" fo:margin-right="0cm" fo:margin-top="0pt" fo:margin-bottom="0pt" fo:border="none"/>
      <style:text-properties/>
    </style:style>
    <style:style style:family="text" style:name="T1288">
      <style:text-properties fo:color="#1f1f1f" fo:font-family="Arial" style:font-family-asian="Arial" style:font-family-complex="Arial" fo:font-size="12pt"/>
    </style:style>
    <style:style style:parent-style-name="1010" style:list-style-name="WWNum41" style:family="paragraph" style:name="P594">
      <style:paragraph-properties fo:line-height="115%" fo:margin-right="0cm" fo:margin-top="0pt" fo:margin-bottom="0pt" fo:border="none"/>
      <style:text-properties/>
    </style:style>
    <style:style style:family="text" style:name="T1289">
      <style:text-properties fo:color="#1f1f1f" fo:font-family="Arial" style:font-family-asian="Arial" style:font-family-complex="Arial" fo:font-size="12pt"/>
    </style:style>
    <style:style style:parent-style-name="1010" style:list-style-name="WWNum41" style:family="paragraph" style:name="P595">
      <style:paragraph-properties fo:line-height="115%" fo:margin-right="0cm" fo:margin-top="0pt" fo:margin-bottom="0pt" fo:border="none"/>
      <style:text-properties/>
    </style:style>
    <style:style style:family="text" style:name="T1290">
      <style:text-properties fo:color="#1f1f1f" fo:font-family="Arial" style:font-family-asian="Arial" style:font-family-complex="Arial" fo:font-size="12pt"/>
    </style:style>
    <style:style style:family="paragraph" style:name="P596">
      <style:paragraph-properties/>
      <style:text-properties/>
    </style:style>
    <style:style style:parent-style-name="949" style:family="paragraph" style:name="P59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91">
      <style:text-properties fo:color="#1f1f1f" fo:font-family="Arial" style:font-family-asian="Arial" style:font-family-complex="Arial" fo:font-size="14pt" fo:font-weight="bold"/>
    </style:style>
    <style:style style:family="paragraph" style:name="P598">
      <style:paragraph-properties fo:line-height="115%" fo:margin-left="0cm" fo:margin-right="0cm" fo:text-indent="0cm" fo:margin-top="0pt" fo:margin-bottom="0pt" fo:border="none"/>
      <style:text-properties/>
    </style:style>
    <style:style style:family="text" style:name="T1292">
      <style:text-properties fo:color="#1f1f1f" fo:font-family="Arial" style:font-family-asian="Arial" style:font-family-complex="Arial" fo:font-size="12pt"/>
    </style:style>
    <style:style style:parent-style-name="950" style:family="paragraph" style:name="P5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3">
      <style:text-properties fo:color="#1f1f1f" fo:font-family="Arial" style:font-family-asian="Arial" style:font-family-complex="Arial" fo:font-size="12pt" fo:font-weight="bold"/>
    </style:style>
    <style:style style:family="paragraph" style:name="P600">
      <style:paragraph-properties fo:line-height="115%" fo:margin-left="0cm" fo:margin-right="0cm" fo:text-indent="0cm" fo:margin-top="0pt" fo:margin-bottom="0pt" fo:border="none"/>
      <style:text-properties/>
    </style:style>
    <style:style style:family="text" style:name="T1294">
      <style:text-properties fo:color="#1f1f1f" fo:font-family="Arial" style:font-family-asian="Arial" style:font-family-complex="Arial" fo:font-size="12pt"/>
    </style:style>
    <style:style style:parent-style-name="950" style:family="paragraph" style:name="P6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5">
      <style:text-properties fo:color="#1f1f1f" fo:font-family="Arial" style:font-family-asian="Arial" style:font-family-complex="Arial" fo:font-size="12pt" fo:font-weight="bold"/>
    </style:style>
    <style:style style:family="paragraph" style:name="P602">
      <style:paragraph-properties fo:line-height="115%" fo:margin-left="0cm" fo:margin-right="0cm" fo:text-indent="0cm" fo:margin-top="0pt" fo:margin-bottom="0pt" fo:border="none"/>
      <style:text-properties/>
    </style:style>
    <style:style style:family="text" style:name="T1296">
      <style:text-properties fo:color="#1f1f1f" fo:font-family="Arial" style:font-family-asian="Arial" style:font-family-complex="Arial" fo:font-size="12pt"/>
    </style:style>
    <style:style style:parent-style-name="950" style:family="paragraph" style:name="P6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7">
      <style:text-properties fo:color="#1f1f1f" fo:font-family="Arial" style:font-family-asian="Arial" style:font-family-complex="Arial" fo:font-size="12pt" fo:font-weight="bold"/>
    </style:style>
    <style:style style:family="paragraph" style:name="P604">
      <style:paragraph-properties fo:line-height="115%" fo:margin-left="0cm" fo:margin-right="0cm" fo:text-indent="0cm" fo:margin-top="0pt" fo:margin-bottom="0pt" fo:border="none"/>
      <style:text-properties/>
    </style:style>
    <style:style style:family="text" style:name="T1298">
      <style:text-properties fo:color="#1f1f1f" fo:font-family="Arial" style:font-family-asian="Arial" style:font-family-complex="Arial" fo:font-size="12pt"/>
    </style:style>
    <style:style style:parent-style-name="950" style:family="paragraph" style:name="P6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9">
      <style:text-properties fo:color="#1f1f1f" fo:font-family="Arial" style:font-family-asian="Arial" style:font-family-complex="Arial" fo:font-size="12pt" fo:font-weight="bold"/>
    </style:style>
    <style:style style:family="paragraph" style:name="P606">
      <style:paragraph-properties fo:line-height="115%" fo:margin-left="0cm" fo:margin-right="0cm" fo:text-indent="0cm" fo:margin-top="0pt" fo:margin-bottom="0pt" fo:border="none"/>
      <style:text-properties/>
    </style:style>
    <style:style style:family="text" style:name="T1300">
      <style:text-properties fo:color="#1f1f1f" fo:font-family="Arial" style:font-family-asian="Arial" style:font-family-complex="Arial" fo:font-size="12pt"/>
    </style:style>
    <style:style style:parent-style-name="949" style:family="paragraph" style:name="P60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01">
      <style:text-properties fo:color="#1f1f1f" fo:font-family="Arial" style:font-family-asian="Arial" style:font-family-complex="Arial" fo:font-size="14pt" fo:font-weight="bold"/>
    </style:style>
    <style:style style:parent-style-name="1010" style:list-style-name="WWNum42" style:family="paragraph" style:name="P608">
      <style:paragraph-properties fo:line-height="115%" fo:margin-right="0cm" fo:margin-top="0pt" fo:margin-bottom="0pt" fo:border="none"/>
      <style:text-properties/>
    </style:style>
    <style:style style:family="text" style:name="T1302">
      <style:text-properties fo:color="#1f1f1f" fo:font-family="Arial" style:font-family-asian="Arial" style:font-family-complex="Arial" fo:font-size="12pt"/>
    </style:style>
    <style:style style:parent-style-name="1010" style:list-style-name="WWNum42" style:family="paragraph" style:name="P609">
      <style:paragraph-properties fo:line-height="115%" fo:margin-right="0cm" fo:margin-top="0pt" fo:margin-bottom="0pt" fo:border="none"/>
      <style:text-properties/>
    </style:style>
    <style:style style:family="text" style:name="T1303">
      <style:text-properties fo:color="#1f1f1f" fo:font-family="Arial" style:font-family-asian="Arial" style:font-family-complex="Arial" fo:font-size="12pt"/>
    </style:style>
    <style:style style:parent-style-name="1010" style:list-style-name="WWNum42" style:family="paragraph" style:name="P610">
      <style:paragraph-properties fo:line-height="115%" fo:margin-right="0cm" fo:margin-top="0pt" fo:margin-bottom="0pt" fo:border="none"/>
      <style:text-properties/>
    </style:style>
    <style:style style:family="text" style:name="T1304">
      <style:text-properties fo:color="#1f1f1f" fo:font-family="Arial" style:font-family-asian="Arial" style:font-family-complex="Arial" fo:font-size="12pt"/>
    </style:style>
    <style:style style:parent-style-name="1010" style:list-style-name="WWNum42" style:family="paragraph" style:name="P611">
      <style:paragraph-properties fo:line-height="115%" fo:margin-right="0cm" fo:margin-top="0pt" fo:margin-bottom="0pt" fo:border="none"/>
      <style:text-properties/>
    </style:style>
    <style:style style:family="text" style:name="T1305">
      <style:text-properties fo:color="#1f1f1f" fo:font-family="Arial" style:font-family-asian="Arial" style:font-family-complex="Arial" fo:font-size="12pt"/>
    </style:style>
    <style:style style:family="paragraph" style:name="P612">
      <style:paragraph-properties/>
      <style:text-properties/>
    </style:style>
    <style:style style:family="paragraph" style:name="P613">
      <style:paragraph-properties fo:line-height="115%" fo:margin-left="0cm" fo:margin-right="0cm" fo:text-indent="0cm" fo:margin-top="0pt" fo:margin-bottom="0pt" fo:break-before="page" fo:border="none"/>
      <style:text-properties/>
    </style:style>
    <style:style style:family="text" style:name="T1306">
      <style:text-properties fo:color="#1f1f1f" fo:font-family="Arial" style:font-family-asian="Arial" style:font-family-complex="Arial" fo:font-size="12pt"/>
    </style:style>
    <style:style style:parent-style-name="949" style:family="paragraph" style:name="P61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07">
      <style:text-properties fo:color="#1f1f1f" fo:font-family="Arial" style:font-family-asian="Arial" style:font-family-complex="Arial" fo:font-size="14pt" fo:font-weight="bold"/>
    </style:style>
    <style:style style:family="paragraph" style:name="P615">
      <style:paragraph-properties fo:line-height="115%" fo:margin-left="0cm" fo:margin-right="0cm" fo:text-indent="0cm" fo:margin-top="0pt" fo:margin-bottom="0pt" fo:border="none"/>
      <style:text-properties/>
    </style:style>
    <style:style style:family="text" style:name="T1308">
      <style:text-properties fo:color="#1f1f1f" fo:font-family="Arial" style:font-family-asian="Arial" style:font-family-complex="Arial" fo:font-size="12pt"/>
    </style:style>
    <style:style style:parent-style-name="950" style:family="paragraph" style:name="P6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09">
      <style:text-properties fo:color="#1f1f1f" fo:font-family="Arial" style:font-family-asian="Arial" style:font-family-complex="Arial" fo:font-size="12pt" fo:font-weight="bold"/>
    </style:style>
    <style:style style:family="paragraph" style:name="P617">
      <style:paragraph-properties fo:line-height="115%" fo:margin-left="0cm" fo:margin-right="0cm" fo:text-indent="0cm" fo:margin-top="0pt" fo:margin-bottom="0pt" fo:border="none"/>
      <style:text-properties/>
    </style:style>
    <style:style style:family="text" style:name="T1310">
      <style:text-properties fo:color="#1f1f1f" fo:font-family="Arial" style:font-family-asian="Arial" style:font-family-complex="Arial" fo:font-size="12pt"/>
    </style:style>
    <style:style style:parent-style-name="950" style:family="paragraph" style:name="P6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11">
      <style:text-properties fo:color="#1f1f1f" fo:font-family="Arial" style:font-family-asian="Arial" style:font-family-complex="Arial" fo:font-size="12pt" fo:font-weight="bold"/>
    </style:style>
    <style:style style:family="paragraph" style:name="P619">
      <style:paragraph-properties fo:line-height="115%" fo:margin-left="0cm" fo:margin-right="0cm" fo:text-indent="0cm" fo:margin-top="0pt" fo:margin-bottom="0pt" fo:border="none"/>
      <style:text-properties/>
    </style:style>
    <style:style style:family="text" style:name="T1312">
      <style:text-properties fo:color="#1f1f1f" fo:font-family="Arial" style:font-family-asian="Arial" style:font-family-complex="Arial" fo:font-size="12pt"/>
    </style:style>
    <style:style style:parent-style-name="950" style:family="paragraph" style:name="P62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13">
      <style:text-properties fo:color="#1f1f1f" fo:font-family="Arial" style:font-family-asian="Arial" style:font-family-complex="Arial" fo:font-size="12pt" fo:font-weight="bold"/>
    </style:style>
    <style:style style:family="paragraph" style:name="P621">
      <style:paragraph-properties fo:line-height="115%" fo:margin-left="0cm" fo:margin-right="0cm" fo:text-indent="0cm" fo:margin-top="0pt" fo:margin-bottom="0pt" fo:border="none"/>
      <style:text-properties/>
    </style:style>
    <style:style style:family="text" style:name="T1314">
      <style:text-properties fo:color="#1f1f1f" fo:font-family="Arial" style:font-family-asian="Arial" style:font-family-complex="Arial" fo:font-size="12pt"/>
    </style:style>
    <style:style style:parent-style-name="950" style:family="paragraph" style:name="P62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15">
      <style:text-properties fo:color="#1f1f1f" fo:font-family="Arial" style:font-family-asian="Arial" style:font-family-complex="Arial" fo:font-size="12pt" fo:font-weight="bold"/>
    </style:style>
    <style:style style:family="paragraph" style:name="P623">
      <style:paragraph-properties fo:line-height="115%" fo:margin-left="0cm" fo:margin-right="0cm" fo:text-indent="0cm" fo:margin-top="0pt" fo:margin-bottom="0pt" fo:border="none"/>
      <style:text-properties/>
    </style:style>
    <style:style style:family="text" style:name="T1316">
      <style:text-properties fo:color="#1f1f1f" fo:font-family="Arial" style:font-family-asian="Arial" style:font-family-complex="Arial" fo:font-size="12pt"/>
    </style:style>
    <style:style style:parent-style-name="949" style:family="paragraph" style:name="P6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17">
      <style:text-properties fo:color="#1f1f1f" fo:font-family="Arial" style:font-family-asian="Arial" style:font-family-complex="Arial" fo:font-size="14pt" fo:font-weight="bold"/>
    </style:style>
    <style:style style:parent-style-name="1010" style:list-style-name="WWNum43" style:family="paragraph" style:name="P625">
      <style:paragraph-properties fo:line-height="115%" fo:margin-right="0cm" fo:margin-top="0pt" fo:margin-bottom="0pt" fo:border="none"/>
      <style:text-properties/>
    </style:style>
    <style:style style:family="text" style:name="T1318">
      <style:text-properties fo:color="#1f1f1f" fo:font-family="Arial" style:font-family-asian="Arial" style:font-family-complex="Arial" fo:font-size="12pt"/>
    </style:style>
    <style:style style:parent-style-name="1010" style:list-style-name="WWNum43" style:family="paragraph" style:name="P626">
      <style:paragraph-properties fo:line-height="115%" fo:margin-right="0cm" fo:margin-top="0pt" fo:margin-bottom="0pt" fo:border="none"/>
      <style:text-properties/>
    </style:style>
    <style:style style:family="text" style:name="T1319">
      <style:text-properties fo:color="#1f1f1f" fo:font-family="Arial" style:font-family-asian="Arial" style:font-family-complex="Arial" fo:font-size="12pt"/>
    </style:style>
    <style:style style:parent-style-name="1010" style:list-style-name="WWNum43" style:family="paragraph" style:name="P627">
      <style:paragraph-properties fo:line-height="115%" fo:margin-right="0cm" fo:margin-top="0pt" fo:margin-bottom="0pt" fo:border="none"/>
      <style:text-properties/>
    </style:style>
    <style:style style:family="text" style:name="T1320">
      <style:text-properties fo:color="#1f1f1f" fo:font-family="Arial" style:font-family-asian="Arial" style:font-family-complex="Arial" fo:font-size="12pt"/>
    </style:style>
    <style:style style:parent-style-name="1010" style:list-style-name="WWNum43" style:family="paragraph" style:name="P628">
      <style:paragraph-properties fo:line-height="115%" fo:margin-right="0cm" fo:margin-top="0pt" fo:margin-bottom="0pt" fo:border="none"/>
      <style:text-properties/>
    </style:style>
    <style:style style:family="text" style:name="T1321">
      <style:text-properties fo:color="#1f1f1f" fo:font-family="Arial" style:font-family-asian="Arial" style:font-family-complex="Arial" fo:font-size="12pt"/>
    </style:style>
    <style:style style:family="paragraph" style:name="P629">
      <style:paragraph-properties/>
      <style:text-properties/>
    </style:style>
    <style:style style:parent-style-name="949" style:family="paragraph" style:name="P63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322">
      <style:text-properties fo:color="#1f1f1f" fo:font-family="Arial" style:font-family-asian="Arial" style:font-family-complex="Arial" fo:font-size="14pt" fo:font-weight="bold"/>
    </style:style>
    <style:style style:family="paragraph" style:name="P631">
      <style:paragraph-properties fo:line-height="115%" fo:margin-left="0cm" fo:margin-right="0cm" fo:text-indent="0cm" fo:margin-top="0pt" fo:margin-bottom="0pt" fo:border="none"/>
      <style:text-properties/>
    </style:style>
    <style:style style:family="text" style:name="T1323">
      <style:text-properties fo:color="#1f1f1f" fo:font-family="Arial" style:font-family-asian="Arial" style:font-family-complex="Arial" fo:font-size="12pt"/>
    </style:style>
    <style:style style:parent-style-name="950" style:family="paragraph" style:name="P6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24">
      <style:text-properties fo:color="#1f1f1f" fo:font-family="Arial" style:font-family-asian="Arial" style:font-family-complex="Arial" fo:font-size="12pt" fo:font-weight="bold"/>
    </style:style>
    <style:style style:family="paragraph" style:name="P633">
      <style:paragraph-properties fo:line-height="115%" fo:margin-left="0cm" fo:margin-right="0cm" fo:text-indent="0cm" fo:margin-top="0pt" fo:margin-bottom="0pt" fo:border="none"/>
      <style:text-properties/>
    </style:style>
    <style:style style:family="text" style:name="T1325">
      <style:text-properties fo:color="#1f1f1f" fo:font-family="Arial" style:font-family-asian="Arial" style:font-family-complex="Arial" fo:font-size="12pt"/>
    </style:style>
    <style:style style:parent-style-name="950" style:family="paragraph" style:name="P63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26">
      <style:text-properties fo:color="#1f1f1f" fo:font-family="Arial" style:font-family-asian="Arial" style:font-family-complex="Arial" fo:font-size="12pt" fo:font-weight="bold"/>
    </style:style>
    <style:style style:family="paragraph" style:name="P635">
      <style:paragraph-properties fo:line-height="115%" fo:margin-left="0cm" fo:margin-right="0cm" fo:text-indent="0cm" fo:margin-top="0pt" fo:margin-bottom="0pt" fo:border="none"/>
      <style:text-properties/>
    </style:style>
    <style:style style:family="text" style:name="T1327">
      <style:text-properties fo:color="#1f1f1f" fo:font-family="Arial" style:font-family-asian="Arial" style:font-family-complex="Arial" fo:font-size="12pt"/>
    </style:style>
    <style:style style:parent-style-name="950" style:family="paragraph" style:name="P6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28">
      <style:text-properties fo:color="#1f1f1f" fo:font-family="Arial" style:font-family-asian="Arial" style:font-family-complex="Arial" fo:font-size="12pt" fo:font-weight="bold"/>
    </style:style>
    <style:style style:family="paragraph" style:name="P637">
      <style:paragraph-properties fo:line-height="115%" fo:margin-left="0cm" fo:margin-right="0cm" fo:text-indent="0cm" fo:margin-top="0pt" fo:margin-bottom="0pt" fo:border="none"/>
      <style:text-properties/>
    </style:style>
    <style:style style:family="text" style:name="T1329">
      <style:text-properties fo:color="#1f1f1f" fo:font-family="Arial" style:font-family-asian="Arial" style:font-family-complex="Arial" fo:font-size="12pt"/>
    </style:style>
    <style:style style:parent-style-name="950" style:family="paragraph" style:name="P6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30">
      <style:text-properties fo:color="#1f1f1f" fo:font-family="Arial" style:font-family-asian="Arial" style:font-family-complex="Arial" fo:font-size="12pt" fo:font-weight="bold"/>
    </style:style>
    <style:style style:family="paragraph" style:name="P639">
      <style:paragraph-properties fo:line-height="115%" fo:margin-left="0cm" fo:margin-right="0cm" fo:text-indent="0cm" fo:margin-top="0pt" fo:margin-bottom="0pt" fo:border="none"/>
      <style:text-properties/>
    </style:style>
    <style:style style:family="text" style:name="T1331">
      <style:text-properties fo:color="#1f1f1f" fo:font-family="Arial" style:font-family-asian="Arial" style:font-family-complex="Arial" fo:font-size="12pt"/>
    </style:style>
    <style:style style:parent-style-name="949" style:family="paragraph" style:name="P64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32">
      <style:text-properties fo:color="#1f1f1f" fo:font-family="Arial" style:font-family-asian="Arial" style:font-family-complex="Arial" fo:font-size="14pt" fo:font-weight="bold"/>
    </style:style>
    <style:style style:parent-style-name="1010" style:list-style-name="WWNum44" style:family="paragraph" style:name="P641">
      <style:paragraph-properties fo:line-height="115%" fo:margin-right="0cm" fo:margin-top="0pt" fo:margin-bottom="0pt" fo:border="none"/>
      <style:text-properties/>
    </style:style>
    <style:style style:family="text" style:name="T1333">
      <style:text-properties fo:color="#1f1f1f" fo:font-family="Arial" style:font-family-asian="Arial" style:font-family-complex="Arial" fo:font-size="12pt"/>
    </style:style>
    <style:style style:parent-style-name="1010" style:list-style-name="WWNum44" style:family="paragraph" style:name="P642">
      <style:paragraph-properties fo:line-height="115%" fo:margin-right="0cm" fo:margin-top="0pt" fo:margin-bottom="0pt" fo:border="none"/>
      <style:text-properties/>
    </style:style>
    <style:style style:family="text" style:name="T1334">
      <style:text-properties fo:color="#1f1f1f" fo:font-family="Arial" style:font-family-asian="Arial" style:font-family-complex="Arial" fo:font-size="12pt"/>
    </style:style>
    <style:style style:parent-style-name="1010" style:list-style-name="WWNum44" style:family="paragraph" style:name="P643">
      <style:paragraph-properties fo:line-height="115%" fo:margin-right="0cm" fo:margin-top="0pt" fo:margin-bottom="0pt" fo:border="none"/>
      <style:text-properties/>
    </style:style>
    <style:style style:family="text" style:name="T1335">
      <style:text-properties fo:color="#1f1f1f" fo:font-family="Arial" style:font-family-asian="Arial" style:font-family-complex="Arial" fo:font-size="12pt"/>
    </style:style>
    <style:style style:parent-style-name="1010" style:list-style-name="WWNum44" style:family="paragraph" style:name="P644">
      <style:paragraph-properties fo:line-height="115%" fo:margin-right="0cm" fo:margin-top="0pt" fo:margin-bottom="0pt" fo:border="none"/>
      <style:text-properties/>
    </style:style>
    <style:style style:family="text" style:name="T1336">
      <style:text-properties fo:color="#1f1f1f" fo:font-family="Arial" style:font-family-asian="Arial" style:font-family-complex="Arial" fo:font-size="12pt"/>
    </style:style>
    <style:style style:family="paragraph" style:name="P645">
      <style:paragraph-properties/>
      <style:text-properties/>
    </style:style>
    <style:style style:family="paragraph" style:name="P646">
      <style:paragraph-properties fo:line-height="115%" fo:margin-left="0cm" fo:margin-right="0cm" fo:text-indent="0cm" fo:margin-top="0pt" fo:margin-bottom="0pt" fo:break-before="page" fo:border="none"/>
      <style:text-properties/>
    </style:style>
    <style:style style:family="text" style:name="T1337">
      <style:text-properties fo:color="#1f1f1f" fo:font-family="Arial" style:font-family-asian="Arial" style:font-family-complex="Arial" fo:font-size="12pt"/>
    </style:style>
    <style:style style:parent-style-name="949" style:family="paragraph" style:name="P64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38">
      <style:text-properties fo:color="#1f1f1f" fo:font-family="Arial" style:font-family-asian="Arial" style:font-family-complex="Arial" fo:font-size="14pt" fo:font-weight="bold"/>
    </style:style>
    <style:style style:family="paragraph" style:name="P648">
      <style:paragraph-properties fo:line-height="115%" fo:margin-left="0cm" fo:margin-right="0cm" fo:text-indent="0cm" fo:margin-top="0pt" fo:margin-bottom="0pt" fo:border="none"/>
      <style:text-properties/>
    </style:style>
    <style:style style:family="text" style:name="T1339">
      <style:text-properties fo:color="#1f1f1f" fo:font-family="Arial" style:font-family-asian="Arial" style:font-family-complex="Arial" fo:font-size="12pt"/>
    </style:style>
    <style:style style:parent-style-name="950" style:family="paragraph" style:name="P64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0">
      <style:text-properties fo:color="#1f1f1f" fo:font-family="Arial" style:font-family-asian="Arial" style:font-family-complex="Arial" fo:font-size="12pt" fo:font-weight="bold"/>
    </style:style>
    <style:style style:family="paragraph" style:name="P650">
      <style:paragraph-properties fo:line-height="115%" fo:margin-left="0cm" fo:margin-right="0cm" fo:text-indent="0cm" fo:margin-top="0pt" fo:margin-bottom="0pt" fo:border="none"/>
      <style:text-properties/>
    </style:style>
    <style:style style:family="text" style:name="T1341">
      <style:text-properties fo:color="#1f1f1f" fo:font-family="Arial" style:font-family-asian="Arial" style:font-family-complex="Arial" fo:font-size="12pt"/>
    </style:style>
    <style:style style:parent-style-name="950" style:family="paragraph" style:name="P65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2">
      <style:text-properties fo:color="#1f1f1f" fo:font-family="Arial" style:font-family-asian="Arial" style:font-family-complex="Arial" fo:font-size="12pt" fo:font-weight="bold"/>
    </style:style>
    <style:style style:family="paragraph" style:name="P652">
      <style:paragraph-properties fo:line-height="115%" fo:margin-left="0cm" fo:margin-right="0cm" fo:text-indent="0cm" fo:margin-top="0pt" fo:margin-bottom="0pt" fo:border="none"/>
      <style:text-properties/>
    </style:style>
    <style:style style:family="text" style:name="T1343">
      <style:text-properties fo:color="#1f1f1f" fo:font-family="Arial" style:font-family-asian="Arial" style:font-family-complex="Arial" fo:font-size="12pt"/>
    </style:style>
    <style:style style:parent-style-name="1010" style:list-style-name="WWNum45" style:family="paragraph" style:name="P653">
      <style:paragraph-properties fo:line-height="115%" fo:margin-right="0cm" fo:margin-top="0pt" fo:margin-bottom="0pt" fo:border="none"/>
      <style:text-properties/>
    </style:style>
    <style:style style:family="text" style:name="T1344">
      <style:text-properties fo:color="#1f1f1f" fo:font-family="Arial" style:font-family-asian="Arial" style:font-family-complex="Arial" fo:font-size="12pt"/>
    </style:style>
    <style:style style:parent-style-name="1010" style:list-style-name="WWNum45" style:family="paragraph" style:name="P654">
      <style:paragraph-properties fo:line-height="115%" fo:margin-right="0cm" fo:margin-top="0pt" fo:margin-bottom="0pt" fo:border="none"/>
      <style:text-properties/>
    </style:style>
    <style:style style:family="text" style:name="T1345">
      <style:text-properties fo:color="#1f1f1f" fo:font-family="Arial" style:font-family-asian="Arial" style:font-family-complex="Arial" fo:font-size="12pt"/>
    </style:style>
    <style:style style:parent-style-name="1010" style:list-style-name="WWNum45" style:family="paragraph" style:name="P655">
      <style:paragraph-properties fo:line-height="115%" fo:margin-right="0cm" fo:margin-top="0pt" fo:margin-bottom="0pt" fo:border="none"/>
      <style:text-properties/>
    </style:style>
    <style:style style:family="text" style:name="T1346">
      <style:text-properties fo:color="#1f1f1f" fo:font-family="Arial" style:font-family-asian="Arial" style:font-family-complex="Arial" fo:font-size="12pt"/>
    </style:style>
    <style:style style:parent-style-name="1010" style:list-style-name="WWNum45" style:family="paragraph" style:name="P656">
      <style:paragraph-properties fo:line-height="115%" fo:margin-right="0cm" fo:margin-top="0pt" fo:margin-bottom="0pt" fo:border="none"/>
      <style:text-properties/>
    </style:style>
    <style:style style:family="text" style:name="T1347">
      <style:text-properties fo:color="#1f1f1f" fo:font-family="Arial" style:font-family-asian="Arial" style:font-family-complex="Arial" fo:font-size="12pt"/>
    </style:style>
    <style:style style:parent-style-name="950" style:family="paragraph" style:name="P65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8">
      <style:text-properties fo:color="#1f1f1f" fo:font-family="Arial" style:font-family-asian="Arial" style:font-family-complex="Arial" fo:font-size="12pt" fo:font-weight="bold"/>
    </style:style>
    <style:style style:family="paragraph" style:name="P658">
      <style:paragraph-properties fo:line-height="115%" fo:margin-left="0cm" fo:margin-right="0cm" fo:text-indent="0cm" fo:margin-top="0pt" fo:margin-bottom="0pt" fo:border="none"/>
      <style:text-properties/>
    </style:style>
    <style:style style:family="text" style:name="T1349">
      <style:text-properties fo:color="#1f1f1f" fo:font-family="Arial" style:font-family-asian="Arial" style:font-family-complex="Arial" fo:font-size="12pt"/>
    </style:style>
    <style:style style:parent-style-name="949" style:family="paragraph" style:name="P65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50">
      <style:text-properties fo:color="#1f1f1f" fo:font-family="Arial" style:font-family-asian="Arial" style:font-family-complex="Arial" fo:font-size="14pt" fo:font-weight="bold"/>
    </style:style>
    <style:style style:parent-style-name="1010" style:list-style-name="WWNum45" style:family="paragraph" style:name="P660">
      <style:paragraph-properties fo:line-height="115%" fo:margin-right="0cm" fo:margin-top="0pt" fo:margin-bottom="0pt" fo:border="none"/>
      <style:text-properties/>
    </style:style>
    <style:style style:family="text" style:name="T1351">
      <style:text-properties fo:color="#1f1f1f" fo:font-family="Arial" style:font-family-asian="Arial" style:font-family-complex="Arial" fo:font-size="12pt"/>
    </style:style>
    <style:style style:parent-style-name="1010" style:list-style-name="WWNum45" style:family="paragraph" style:name="P661">
      <style:paragraph-properties fo:line-height="115%" fo:margin-right="0cm" fo:margin-top="0pt" fo:margin-bottom="0pt" fo:border="none"/>
      <style:text-properties/>
    </style:style>
    <style:style style:family="text" style:name="T1352">
      <style:text-properties fo:color="#1f1f1f" fo:font-family="Arial" style:font-family-asian="Arial" style:font-family-complex="Arial" fo:font-size="12pt"/>
    </style:style>
    <style:style style:parent-style-name="1010" style:list-style-name="WWNum45" style:family="paragraph" style:name="P662">
      <style:paragraph-properties fo:line-height="115%" fo:margin-right="0cm" fo:margin-top="0pt" fo:margin-bottom="0pt" fo:border="none"/>
      <style:text-properties/>
    </style:style>
    <style:style style:family="text" style:name="T1353">
      <style:text-properties fo:color="#1f1f1f" fo:font-family="Arial" style:font-family-asian="Arial" style:font-family-complex="Arial" fo:font-size="12pt"/>
    </style:style>
    <style:style style:parent-style-name="1010" style:list-style-name="WWNum45" style:family="paragraph" style:name="P663">
      <style:paragraph-properties fo:line-height="115%" fo:margin-right="0cm" fo:margin-top="0pt" fo:margin-bottom="0pt" fo:border="none"/>
      <style:text-properties/>
    </style:style>
    <style:style style:family="text" style:name="T1354">
      <style:text-properties fo:color="#1f1f1f" fo:font-family="Arial" style:font-family-asian="Arial" style:font-family-complex="Arial" fo:font-size="12pt"/>
    </style:style>
    <style:style style:family="paragraph" style:name="P664">
      <style:paragraph-properties/>
      <style:text-properties/>
    </style:style>
    <style:style style:parent-style-name="949" style:family="paragraph" style:name="P665">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355">
      <style:text-properties fo:color="#1f1f1f" fo:font-family="Arial" style:font-family-asian="Arial" style:font-family-complex="Arial" fo:font-size="14pt" fo:font-weight="bold"/>
    </style:style>
    <style:style style:family="paragraph" style:name="P666">
      <style:paragraph-properties fo:line-height="115%" fo:margin-left="0cm" fo:margin-right="0cm" fo:text-indent="0cm" fo:margin-top="0pt" fo:margin-bottom="0pt" fo:border="none"/>
      <style:text-properties/>
    </style:style>
    <style:style style:family="text" style:name="T1356">
      <style:text-properties fo:color="#1f1f1f" fo:font-family="Arial" style:font-family-asian="Arial" style:font-family-complex="Arial" fo:font-size="12pt"/>
    </style:style>
    <style:style style:parent-style-name="950" style:family="paragraph" style:name="P66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57">
      <style:text-properties fo:color="#1f1f1f" fo:font-family="Arial" style:font-family-asian="Arial" style:font-family-complex="Arial" fo:font-size="12pt" fo:font-weight="bold"/>
    </style:style>
    <style:style style:family="paragraph" style:name="P668">
      <style:paragraph-properties fo:line-height="115%" fo:margin-left="0cm" fo:margin-right="0cm" fo:text-indent="0cm" fo:margin-top="0pt" fo:margin-bottom="0pt" fo:border="none"/>
      <style:text-properties/>
    </style:style>
    <style:style style:family="text" style:name="T1358">
      <style:text-properties fo:color="#1f1f1f" fo:font-family="Arial" style:font-family-asian="Arial" style:font-family-complex="Arial" fo:font-size="12pt"/>
    </style:style>
    <style:style style:parent-style-name="950" style:family="paragraph" style:name="P66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59">
      <style:text-properties fo:color="#1f1f1f" fo:font-family="Arial" style:font-family-asian="Arial" style:font-family-complex="Arial" fo:font-size="12pt" fo:font-weight="bold"/>
    </style:style>
    <style:style style:family="paragraph" style:name="P670">
      <style:paragraph-properties fo:line-height="115%" fo:margin-left="0cm" fo:margin-right="0cm" fo:text-indent="0cm" fo:margin-top="0pt" fo:margin-bottom="0pt" fo:border="none"/>
      <style:text-properties/>
    </style:style>
    <style:style style:family="text" style:name="T1360">
      <style:text-properties fo:color="#1f1f1f" fo:font-family="Arial" style:font-family-asian="Arial" style:font-family-complex="Arial" fo:font-size="12pt"/>
    </style:style>
    <style:style style:family="paragraph" style:name="P671">
      <style:paragraph-properties fo:line-height="115%" fo:margin-left="0cm" fo:margin-right="0cm" fo:text-indent="0cm" fo:margin-top="0pt" fo:margin-bottom="0pt" fo:border="none"/>
      <style:text-properties/>
    </style:style>
    <style:style style:family="text" style:name="T1361">
      <style:text-properties fo:color="#1f1f1f" fo:font-family="Arial" style:font-family-asian="Arial" style:font-family-complex="Arial" fo:font-size="12pt"/>
    </style:style>
    <style:style style:parent-style-name="1010" style:list-style-name="WWNum46" style:family="paragraph" style:name="P672">
      <style:paragraph-properties fo:line-height="115%" fo:margin-right="0cm" fo:margin-top="0pt" fo:margin-bottom="0pt" fo:border="none"/>
      <style:text-properties/>
    </style:style>
    <style:style style:family="text" style:name="T1362">
      <style:text-properties fo:color="#1f1f1f" fo:font-family="Arial" style:font-family-asian="Arial" style:font-family-complex="Arial" fo:font-size="12pt"/>
    </style:style>
    <style:style style:parent-style-name="1010" style:list-style-name="WWNum46" style:family="paragraph" style:name="P673">
      <style:paragraph-properties fo:line-height="115%" fo:margin-right="0cm" fo:margin-top="0pt" fo:margin-bottom="0pt" fo:border="none"/>
      <style:text-properties/>
    </style:style>
    <style:style style:family="text" style:name="T1363">
      <style:text-properties fo:color="#1f1f1f" fo:font-family="Arial" style:font-family-asian="Arial" style:font-family-complex="Arial" fo:font-size="12pt"/>
    </style:style>
    <style:style style:parent-style-name="950" style:family="paragraph" style:name="P6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64">
      <style:text-properties fo:color="#1f1f1f" fo:font-family="Arial" style:font-family-asian="Arial" style:font-family-complex="Arial" fo:font-size="12pt" fo:font-weight="bold"/>
    </style:style>
    <style:style style:family="paragraph" style:name="P675">
      <style:paragraph-properties fo:line-height="115%" fo:margin-left="0cm" fo:margin-right="0cm" fo:text-indent="0cm" fo:margin-top="0pt" fo:margin-bottom="0pt" fo:border="none"/>
      <style:text-properties/>
    </style:style>
    <style:style style:family="text" style:name="T1365">
      <style:text-properties fo:color="#1f1f1f" fo:font-family="Arial" style:font-family-asian="Arial" style:font-family-complex="Arial" fo:font-size="12pt"/>
    </style:style>
    <style:style style:parent-style-name="950" style:family="paragraph" style:name="P6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66">
      <style:text-properties fo:color="#1f1f1f" fo:font-family="Arial" style:font-family-asian="Arial" style:font-family-complex="Arial" fo:font-size="12pt" fo:font-weight="bold"/>
    </style:style>
    <style:style style:family="paragraph" style:name="P677">
      <style:paragraph-properties fo:line-height="115%" fo:margin-left="0cm" fo:margin-right="0cm" fo:text-indent="0cm" fo:margin-top="0pt" fo:margin-bottom="0pt" fo:border="none"/>
      <style:text-properties/>
    </style:style>
    <style:style style:family="text" style:name="T1367">
      <style:text-properties fo:color="#1f1f1f" fo:font-family="Arial" style:font-family-asian="Arial" style:font-family-complex="Arial" fo:font-size="12pt"/>
    </style:style>
    <style:style style:parent-style-name="949" style:family="paragraph" style:name="P6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68">
      <style:text-properties fo:color="#1f1f1f" fo:font-family="Arial" style:font-family-asian="Arial" style:font-family-complex="Arial" fo:font-size="14pt" fo:font-weight="bold"/>
    </style:style>
    <style:style style:parent-style-name="1010" style:list-style-name="WWNum46" style:family="paragraph" style:name="P679">
      <style:paragraph-properties fo:line-height="115%" fo:margin-right="0cm" fo:margin-top="0pt" fo:margin-bottom="0pt" fo:border="none"/>
      <style:text-properties/>
    </style:style>
    <style:style style:family="text" style:name="T1369">
      <style:text-properties fo:color="#1f1f1f" fo:font-family="Arial" style:font-family-asian="Arial" style:font-family-complex="Arial" fo:font-size="12pt"/>
    </style:style>
    <style:style style:parent-style-name="1010" style:list-style-name="WWNum46" style:family="paragraph" style:name="P680">
      <style:paragraph-properties fo:line-height="115%" fo:margin-right="0cm" fo:margin-top="0pt" fo:margin-bottom="0pt" fo:border="none"/>
      <style:text-properties/>
    </style:style>
    <style:style style:family="text" style:name="T1370">
      <style:text-properties fo:color="#1f1f1f" fo:font-family="Arial" style:font-family-asian="Arial" style:font-family-complex="Arial" fo:font-size="12pt"/>
    </style:style>
    <style:style style:parent-style-name="1010" style:list-style-name="WWNum46" style:family="paragraph" style:name="P681">
      <style:paragraph-properties fo:line-height="115%" fo:margin-right="0cm" fo:margin-top="0pt" fo:margin-bottom="0pt" fo:border="none"/>
      <style:text-properties/>
    </style:style>
    <style:style style:family="text" style:name="T1371">
      <style:text-properties fo:color="#1f1f1f" fo:font-family="Arial" style:font-family-asian="Arial" style:font-family-complex="Arial" fo:font-size="12pt"/>
    </style:style>
    <style:style style:parent-style-name="1010" style:list-style-name="WWNum46" style:family="paragraph" style:name="P682">
      <style:paragraph-properties fo:line-height="115%" fo:margin-right="0cm" fo:margin-top="0pt" fo:margin-bottom="0pt" fo:border="none"/>
      <style:text-properties/>
    </style:style>
    <style:style style:family="text" style:name="T1372">
      <style:text-properties fo:color="#1f1f1f" fo:font-family="Arial" style:font-family-asian="Arial" style:font-family-complex="Arial" fo:font-size="12pt"/>
    </style:style>
    <style:style style:family="paragraph" style:name="P683">
      <style:paragraph-properties/>
      <style:text-properties/>
    </style:style>
    <style:style style:family="paragraph" style:name="P684">
      <style:paragraph-properties fo:line-height="115%" fo:margin-left="0cm" fo:margin-right="0cm" fo:text-indent="0cm" fo:margin-top="0pt" fo:margin-bottom="0pt" fo:break-before="page" fo:border="none"/>
      <style:text-properties/>
    </style:style>
    <style:style style:family="text" style:name="T1373">
      <style:text-properties fo:color="#1f1f1f" fo:font-family="Arial" style:font-family-asian="Arial" style:font-family-complex="Arial" fo:font-size="12pt"/>
    </style:style>
    <style:style style:parent-style-name="949" style:family="paragraph" style:name="P68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74">
      <style:text-properties fo:color="#1f1f1f" fo:font-family="Arial" style:font-family-asian="Arial" style:font-family-complex="Arial" fo:font-size="14pt" fo:font-weight="bold"/>
    </style:style>
    <style:style style:family="paragraph" style:name="P686">
      <style:paragraph-properties fo:line-height="115%" fo:margin-left="0cm" fo:margin-right="0cm" fo:text-indent="0cm" fo:margin-top="0pt" fo:margin-bottom="0pt" fo:border="none"/>
      <style:text-properties/>
    </style:style>
    <style:style style:family="text" style:name="T1375">
      <style:text-properties fo:color="#1f1f1f" fo:font-family="Arial" style:font-family-asian="Arial" style:font-family-complex="Arial" fo:font-size="12pt"/>
    </style:style>
    <style:style style:family="paragraph" style:name="P687">
      <style:paragraph-properties fo:line-height="115%" fo:margin-left="0cm" fo:margin-right="0cm" fo:text-indent="0cm" fo:margin-top="0pt" fo:margin-bottom="0pt" fo:border="none"/>
      <style:text-properties/>
    </style:style>
    <style:style style:family="text" style:name="T1376">
      <style:text-properties fo:color="#1f1f1f" fo:font-family="Arial" style:font-family-asian="Arial" style:font-family-complex="Arial" fo:font-size="12pt"/>
    </style:style>
    <style:style style:family="text" style:name="T1377">
      <style:text-properties fo:color="#1f1f1f" fo:font-family="Arial" style:font-family-asian="Arial" style:font-family-complex="Arial" fo:font-size="12pt"/>
    </style:style>
    <style:style style:family="paragraph" style:name="P688">
      <style:paragraph-properties fo:line-height="115%" fo:margin-left="0cm" fo:margin-right="0cm" fo:text-indent="0cm" fo:margin-top="0pt" fo:margin-bottom="0pt" fo:border="none"/>
      <style:text-properties/>
    </style:style>
    <style:style style:family="text" style:name="T1378">
      <style:text-properties fo:color="#1f1f1f" fo:font-family="Arial" style:font-family-asian="Arial" style:font-family-complex="Arial" fo:font-size="12pt"/>
    </style:style>
    <style:style style:family="text" style:name="T1379">
      <style:text-properties fo:color="#1f1f1f" fo:font-family="Arial" style:font-family-asian="Arial" style:font-family-complex="Arial" fo:font-size="12pt"/>
    </style:style>
    <style:style style:family="paragraph" style:name="P689">
      <style:paragraph-properties fo:line-height="115%" fo:margin-left="0cm" fo:margin-right="0cm" fo:text-indent="0cm" fo:margin-top="0pt" fo:margin-bottom="0pt" fo:border="none"/>
      <style:text-properties/>
    </style:style>
    <style:style style:family="text" style:name="T1380">
      <style:text-properties fo:color="#1f1f1f" fo:font-family="Arial" style:font-family-asian="Arial" style:font-family-complex="Arial" fo:font-size="12pt"/>
    </style:style>
    <style:style style:family="paragraph" style:name="P690">
      <style:paragraph-properties fo:line-height="115%" fo:margin-left="0cm" fo:margin-right="0cm" fo:text-indent="0cm" fo:margin-top="0pt" fo:margin-bottom="0pt" fo:border="none"/>
      <style:text-properties/>
    </style:style>
    <style:style style:family="text" style:name="T1381">
      <style:text-properties fo:color="#1f1f1f" fo:font-family="Arial" style:font-family-asian="Arial" style:font-family-complex="Arial" fo:font-size="12pt"/>
    </style:style>
    <style:style style:family="text" style:name="T1382">
      <style:text-properties fo:color="#1f1f1f" fo:font-family="Arial" style:font-family-asian="Arial" style:font-family-complex="Arial" fo:font-size="12pt"/>
    </style:style>
    <style:style style:parent-style-name="949" style:family="paragraph" style:name="P69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83">
      <style:text-properties fo:color="#1f1f1f" fo:font-family="Arial" style:font-family-asian="Arial" style:font-family-complex="Arial" fo:font-size="14pt" fo:font-weight="bold"/>
    </style:style>
    <style:style style:parent-style-name="1010" style:list-style-name="WWNum47" style:family="paragraph" style:name="P692">
      <style:paragraph-properties fo:line-height="115%" fo:margin-right="0cm" fo:margin-top="0pt" fo:margin-bottom="0pt" fo:border="none"/>
      <style:text-properties/>
    </style:style>
    <style:style style:family="text" style:name="T1384">
      <style:text-properties fo:color="#1f1f1f" fo:font-family="Arial" style:font-family-asian="Arial" style:font-family-complex="Arial" fo:font-size="12pt"/>
    </style:style>
    <style:style style:parent-style-name="1010" style:list-style-name="WWNum47" style:family="paragraph" style:name="P693">
      <style:paragraph-properties fo:line-height="115%" fo:margin-right="0cm" fo:margin-top="0pt" fo:margin-bottom="0pt" fo:border="none"/>
      <style:text-properties/>
    </style:style>
    <style:style style:family="text" style:name="T1385">
      <style:text-properties fo:color="#1f1f1f" fo:font-family="Arial" style:font-family-asian="Arial" style:font-family-complex="Arial" fo:font-size="12pt"/>
    </style:style>
    <style:style style:parent-style-name="1010" style:list-style-name="WWNum47" style:family="paragraph" style:name="P694">
      <style:paragraph-properties fo:line-height="115%" fo:margin-right="0cm" fo:margin-top="0pt" fo:margin-bottom="0pt" fo:border="none"/>
      <style:text-properties/>
    </style:style>
    <style:style style:family="text" style:name="T1386">
      <style:text-properties fo:color="#1f1f1f" fo:font-family="Arial" style:font-family-asian="Arial" style:font-family-complex="Arial" fo:font-size="12pt"/>
    </style:style>
    <style:style style:parent-style-name="1010" style:list-style-name="WWNum47" style:family="paragraph" style:name="P695">
      <style:paragraph-properties fo:line-height="115%" fo:margin-right="0cm" fo:margin-top="0pt" fo:margin-bottom="0pt" fo:border="none"/>
      <style:text-properties/>
    </style:style>
    <style:style style:family="text" style:name="T1387">
      <style:text-properties fo:color="#1f1f1f" fo:font-family="Arial" style:font-family-asian="Arial" style:font-family-complex="Arial" fo:font-size="12pt"/>
    </style:style>
    <style:style style:family="paragraph" style:name="P696">
      <style:paragraph-properties/>
      <style:text-properties/>
    </style:style>
    <style:style style:family="paragraph" style:name="P697">
      <style:paragraph-properties fo:line-height="115%" fo:margin-left="0cm" fo:margin-right="0cm" fo:text-indent="0cm" fo:margin-top="0pt" fo:margin-bottom="0pt" fo:break-before="page" fo:border="none"/>
      <style:text-properties/>
    </style:style>
    <style:style style:family="text" style:name="T1388">
      <style:text-properties fo:color="#1f1f1f" fo:font-family="Arial" style:font-family-asian="Arial" style:font-family-complex="Arial" fo:font-size="12pt"/>
    </style:style>
    <style:style style:parent-style-name="949" style:family="paragraph" style:name="P69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89">
      <style:text-properties fo:color="#1f1f1f" fo:font-family="Arial" style:font-family-asian="Arial" style:font-family-complex="Arial" fo:font-size="14pt" fo:font-weight="bold"/>
    </style:style>
    <style:style style:family="paragraph" style:name="P699">
      <style:paragraph-properties fo:line-height="115%" fo:margin-left="0cm" fo:margin-right="0cm" fo:text-indent="0cm" fo:margin-top="0pt" fo:margin-bottom="0pt" fo:border="none"/>
      <style:text-properties/>
    </style:style>
    <style:style style:family="text" style:name="T1390">
      <style:text-properties fo:color="#1f1f1f" fo:font-family="Arial" style:font-family-asian="Arial" style:font-family-complex="Arial" fo:font-size="12pt"/>
    </style:style>
    <style:style style:parent-style-name="950" style:family="paragraph" style:name="P70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91">
      <style:text-properties fo:color="#1f1f1f" fo:font-family="Arial" style:font-family-asian="Arial" style:font-family-complex="Arial" fo:font-size="12pt" fo:font-weight="bold"/>
    </style:style>
    <style:style style:family="paragraph" style:name="P701">
      <style:paragraph-properties fo:line-height="115%" fo:margin-left="0cm" fo:margin-right="0cm" fo:text-indent="0cm" fo:margin-top="0pt" fo:margin-bottom="0pt" fo:border="none"/>
      <style:text-properties/>
    </style:style>
    <style:style style:family="text" style:name="T1392">
      <style:text-properties fo:color="#1f1f1f" fo:font-family="Arial" style:font-family-asian="Arial" style:font-family-complex="Arial" fo:font-size="12pt"/>
    </style:style>
    <style:style style:family="text" style:name="T1393">
      <style:text-properties fo:color="#1f1f1f" fo:font-family="Arial" style:font-family-asian="Arial" style:font-family-complex="Arial" fo:font-size="12pt"/>
    </style:style>
    <style:style style:parent-style-name="950" style:family="paragraph" style:name="P70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94">
      <style:text-properties fo:color="#1f1f1f" fo:font-family="Arial" style:font-family-asian="Arial" style:font-family-complex="Arial" fo:font-size="12pt" fo:font-weight="bold"/>
    </style:style>
    <style:style style:family="paragraph" style:name="P703">
      <style:paragraph-properties fo:line-height="115%" fo:margin-left="0cm" fo:margin-right="0cm" fo:text-indent="0cm" fo:margin-top="0pt" fo:margin-bottom="0pt" fo:border="none"/>
      <style:text-properties/>
    </style:style>
    <style:style style:family="text" style:name="T1395">
      <style:text-properties fo:color="#1f1f1f" fo:font-family="Arial" style:font-family-asian="Arial" style:font-family-complex="Arial" fo:font-size="12pt"/>
    </style:style>
    <style:style style:parent-style-name="950" style:family="paragraph" style:name="P70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96">
      <style:text-properties fo:color="#1f1f1f" fo:font-family="Arial" style:font-family-asian="Arial" style:font-family-complex="Arial" fo:font-size="12pt" fo:font-weight="bold"/>
    </style:style>
    <style:style style:family="paragraph" style:name="P705">
      <style:paragraph-properties fo:line-height="115%" fo:margin-left="0cm" fo:margin-right="0cm" fo:text-indent="0cm" fo:margin-top="0pt" fo:margin-bottom="0pt" fo:border="none"/>
      <style:text-properties/>
    </style:style>
    <style:style style:family="text" style:name="T1397">
      <style:text-properties fo:color="#1f1f1f" fo:font-family="Arial" style:font-family-asian="Arial" style:font-family-complex="Arial" fo:font-size="12pt"/>
    </style:style>
    <style:style style:parent-style-name="950" style:family="paragraph" style:name="P70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98">
      <style:text-properties fo:color="#1f1f1f" fo:font-family="Arial" style:font-family-asian="Arial" style:font-family-complex="Arial" fo:font-size="12pt" fo:font-weight="bold"/>
    </style:style>
    <style:style style:family="paragraph" style:name="P707">
      <style:paragraph-properties fo:line-height="115%" fo:margin-left="0cm" fo:margin-right="0cm" fo:text-indent="0cm" fo:margin-top="0pt" fo:margin-bottom="0pt" fo:border="none"/>
      <style:text-properties/>
    </style:style>
    <style:style style:family="text" style:name="T1399">
      <style:text-properties fo:color="#1f1f1f" fo:font-family="Arial" style:font-family-asian="Arial" style:font-family-complex="Arial" fo:font-size="12pt"/>
    </style:style>
    <style:style style:parent-style-name="949" style:family="paragraph" style:name="P70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00">
      <style:text-properties fo:color="#1f1f1f" fo:font-family="Arial" style:font-family-asian="Arial" style:font-family-complex="Arial" fo:font-size="14pt" fo:font-weight="bold"/>
    </style:style>
    <style:style style:parent-style-name="1010" style:list-style-name="WWNum48" style:family="paragraph" style:name="P709">
      <style:paragraph-properties fo:line-height="115%" fo:margin-right="0cm" fo:margin-top="0pt" fo:margin-bottom="0pt" fo:border="none"/>
      <style:text-properties/>
    </style:style>
    <style:style style:family="text" style:name="T1401">
      <style:text-properties fo:color="#1f1f1f" fo:font-family="Arial" style:font-family-asian="Arial" style:font-family-complex="Arial" fo:font-size="12pt"/>
    </style:style>
    <style:style style:parent-style-name="1010" style:list-style-name="WWNum48" style:family="paragraph" style:name="P710">
      <style:paragraph-properties fo:line-height="115%" fo:margin-right="0cm" fo:margin-top="0pt" fo:margin-bottom="0pt" fo:border="none"/>
      <style:text-properties/>
    </style:style>
    <style:style style:family="text" style:name="T1402">
      <style:text-properties fo:color="#1f1f1f" fo:font-family="Arial" style:font-family-asian="Arial" style:font-family-complex="Arial" fo:font-size="12pt"/>
    </style:style>
    <style:style style:parent-style-name="1010" style:list-style-name="WWNum48" style:family="paragraph" style:name="P711">
      <style:paragraph-properties fo:line-height="115%" fo:margin-right="0cm" fo:margin-top="0pt" fo:margin-bottom="0pt" fo:border="none"/>
      <style:text-properties/>
    </style:style>
    <style:style style:family="text" style:name="T1403">
      <style:text-properties fo:color="#1f1f1f" fo:font-family="Arial" style:font-family-asian="Arial" style:font-family-complex="Arial" fo:font-size="12pt"/>
    </style:style>
    <style:style style:parent-style-name="1010" style:list-style-name="WWNum48" style:family="paragraph" style:name="P712">
      <style:paragraph-properties fo:line-height="115%" fo:margin-right="0cm" fo:margin-top="0pt" fo:margin-bottom="0pt" fo:border="none"/>
      <style:text-properties/>
    </style:style>
    <style:style style:family="text" style:name="T1404">
      <style:text-properties fo:color="#1f1f1f" fo:font-family="Arial" style:font-family-asian="Arial" style:font-family-complex="Arial" fo:font-size="12pt"/>
    </style:style>
    <style:style style:family="paragraph" style:name="P713">
      <style:paragraph-properties/>
      <style:text-properties/>
    </style:style>
    <style:style style:parent-style-name="949" style:family="paragraph" style:name="P71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405">
      <style:text-properties fo:color="#1f1f1f" fo:font-family="Arial" style:font-family-asian="Arial" style:font-family-complex="Arial" fo:font-size="14pt" fo:font-weight="bold"/>
    </style:style>
    <style:style style:family="paragraph" style:name="P715">
      <style:paragraph-properties fo:line-height="115%" fo:margin-left="0cm" fo:margin-right="0cm" fo:text-indent="0cm" fo:margin-top="0pt" fo:margin-bottom="0pt" fo:border="none"/>
      <style:text-properties/>
    </style:style>
    <style:style style:family="text" style:name="T1406">
      <style:text-properties fo:color="#1f1f1f" fo:font-family="Arial" style:font-family-asian="Arial" style:font-family-complex="Arial" fo:font-size="12pt"/>
    </style:style>
    <style:style style:family="paragraph" style:name="P716">
      <style:paragraph-properties fo:line-height="115%" fo:margin-left="0cm" fo:margin-right="0cm" fo:text-indent="0cm" fo:margin-top="0pt" fo:margin-bottom="0pt" fo:border="none"/>
      <style:text-properties/>
    </style:style>
    <style:style style:family="text" style:name="T1407">
      <style:text-properties fo:color="#1f1f1f" fo:font-family="Arial" style:font-family-asian="Arial" style:font-family-complex="Arial" fo:font-size="12pt"/>
    </style:style>
    <style:style style:family="text" style:name="T1408">
      <style:text-properties fo:color="#1f1f1f" fo:font-family="Arial" style:font-family-asian="Arial" style:font-family-complex="Arial" fo:font-size="12pt" fo:font-weight="bold"/>
    </style:style>
    <style:style style:family="text" style:name="T1409">
      <style:text-properties fo:color="#1f1f1f" fo:font-family="Arial" style:font-family-asian="Arial" style:font-family-complex="Arial" fo:font-size="12pt"/>
    </style:style>
    <style:style style:family="paragraph" style:name="P717">
      <style:paragraph-properties fo:line-height="115%" fo:margin-left="0cm" fo:margin-right="0cm" fo:text-indent="0cm" fo:margin-top="0pt" fo:margin-bottom="0pt" fo:border="none"/>
      <style:text-properties/>
    </style:style>
    <style:style style:family="text" style:name="T1410">
      <style:text-properties fo:color="#1f1f1f" fo:font-family="Arial" style:font-family-asian="Arial" style:font-family-complex="Arial" fo:font-size="12pt"/>
    </style:style>
    <style:style style:family="paragraph" style:name="P718">
      <style:paragraph-properties fo:line-height="115%" fo:margin-left="0cm" fo:margin-right="0cm" fo:text-indent="0cm" fo:margin-top="0pt" fo:margin-bottom="0pt" fo:border="none"/>
      <style:text-properties/>
    </style:style>
    <style:style style:family="text" style:name="T1411">
      <style:text-properties fo:color="#1f1f1f" fo:font-family="Arial" style:font-family-asian="Arial" style:font-family-complex="Arial" fo:font-size="12pt"/>
    </style:style>
    <style:style style:family="paragraph" style:name="P719">
      <style:paragraph-properties fo:line-height="115%" fo:margin-left="0cm" fo:margin-right="0cm" fo:text-indent="0cm" fo:margin-top="0pt" fo:margin-bottom="0pt" fo:border="none"/>
      <style:text-properties/>
    </style:style>
    <style:style style:family="text" style:name="T1412">
      <style:text-properties fo:color="#1f1f1f" fo:font-family="Arial" style:font-family-asian="Arial" style:font-family-complex="Arial" fo:font-size="12pt"/>
    </style:style>
    <style:style style:parent-style-name="949" style:family="paragraph" style:name="P72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13">
      <style:text-properties fo:color="#1f1f1f" fo:font-family="Arial" style:font-family-asian="Arial" style:font-family-complex="Arial" fo:font-size="14pt" fo:font-weight="bold"/>
    </style:style>
    <style:style style:parent-style-name="1010" style:list-style-name="WWNum49" style:family="paragraph" style:name="P721">
      <style:paragraph-properties fo:line-height="115%" fo:margin-right="0cm" fo:margin-top="0pt" fo:margin-bottom="0pt" fo:border="none"/>
      <style:text-properties/>
    </style:style>
    <style:style style:family="text" style:name="T1414">
      <style:text-properties fo:color="#1f1f1f" fo:font-family="Arial" style:font-family-asian="Arial" style:font-family-complex="Arial" fo:font-size="12pt"/>
    </style:style>
    <style:style style:parent-style-name="1010" style:list-style-name="WWNum49" style:family="paragraph" style:name="P722">
      <style:paragraph-properties fo:line-height="115%" fo:margin-right="0cm" fo:margin-top="0pt" fo:margin-bottom="0pt" fo:border="none"/>
      <style:text-properties/>
    </style:style>
    <style:style style:family="text" style:name="T1415">
      <style:text-properties fo:color="#1f1f1f" fo:font-family="Arial" style:font-family-asian="Arial" style:font-family-complex="Arial" fo:font-size="12pt"/>
    </style:style>
    <style:style style:parent-style-name="1010" style:list-style-name="WWNum49" style:family="paragraph" style:name="P723">
      <style:paragraph-properties fo:line-height="115%" fo:margin-right="0cm" fo:margin-top="0pt" fo:margin-bottom="0pt" fo:border="none"/>
      <style:text-properties/>
    </style:style>
    <style:style style:family="text" style:name="T1416">
      <style:text-properties fo:color="#1f1f1f" fo:font-family="Arial" style:font-family-asian="Arial" style:font-family-complex="Arial" fo:font-size="12pt"/>
    </style:style>
    <style:style style:parent-style-name="1010" style:list-style-name="WWNum49" style:family="paragraph" style:name="P724">
      <style:paragraph-properties fo:line-height="115%" fo:margin-right="0cm" fo:margin-top="0pt" fo:margin-bottom="0pt" fo:border="none"/>
      <style:text-properties/>
    </style:style>
    <style:style style:family="text" style:name="T1417">
      <style:text-properties fo:color="#1f1f1f" fo:font-family="Arial" style:font-family-asian="Arial" style:font-family-complex="Arial" fo:font-size="12pt"/>
    </style:style>
    <style:style style:family="paragraph" style:name="P725">
      <style:paragraph-properties/>
      <style:text-properties/>
    </style:style>
    <style:style style:parent-style-name="949" style:family="paragraph" style:name="P72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418">
      <style:text-properties fo:color="#1f1f1f" fo:font-family="Arial" style:font-family-asian="Arial" style:font-family-complex="Arial" fo:font-size="14pt" fo:font-weight="bold"/>
    </style:style>
    <style:style style:family="paragraph" style:name="P727">
      <style:paragraph-properties fo:line-height="115%" fo:margin-left="0cm" fo:margin-right="0cm" fo:text-indent="0cm" fo:margin-top="0pt" fo:margin-bottom="0pt" fo:border="none"/>
      <style:text-properties/>
    </style:style>
    <style:style style:family="text" style:name="T1419">
      <style:text-properties fo:color="#1f1f1f" fo:font-family="Arial" style:font-family-asian="Arial" style:font-family-complex="Arial" fo:font-size="12pt"/>
    </style:style>
    <style:style style:parent-style-name="950" style:family="paragraph" style:name="P72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20">
      <style:text-properties fo:color="#1f1f1f" fo:font-family="Arial" style:font-family-asian="Arial" style:font-family-complex="Arial" fo:font-size="12pt" fo:font-weight="bold"/>
    </style:style>
    <style:style style:family="paragraph" style:name="P729">
      <style:paragraph-properties fo:line-height="115%" fo:margin-left="0cm" fo:margin-right="0cm" fo:text-indent="0cm" fo:margin-top="0pt" fo:margin-bottom="0pt" fo:border="none"/>
      <style:text-properties/>
    </style:style>
    <style:style style:family="text" style:name="T1421">
      <style:text-properties fo:color="#1f1f1f" fo:font-family="Arial" style:font-family-asian="Arial" style:font-family-complex="Arial" fo:font-size="12pt"/>
    </style:style>
    <style:style style:family="text" style:name="T1422">
      <style:text-properties fo:color="#1f1f1f" fo:font-family="Arial" style:font-family-asian="Arial" style:font-family-complex="Arial" fo:font-size="12pt"/>
    </style:style>
    <style:style style:parent-style-name="950" style:family="paragraph" style:name="P73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23">
      <style:text-properties fo:color="#1f1f1f" fo:font-family="Arial" style:font-family-asian="Arial" style:font-family-complex="Arial" fo:font-size="12pt" fo:font-weight="bold"/>
    </style:style>
    <style:style style:family="paragraph" style:name="P731">
      <style:paragraph-properties fo:line-height="115%" fo:margin-left="0cm" fo:margin-right="0cm" fo:text-indent="0cm" fo:margin-top="0pt" fo:margin-bottom="0pt" fo:border="none"/>
      <style:text-properties/>
    </style:style>
    <style:style style:family="text" style:name="T1424">
      <style:text-properties fo:color="#1f1f1f" fo:font-family="Arial" style:font-family-asian="Arial" style:font-family-complex="Arial" fo:font-size="12pt"/>
    </style:style>
    <style:style style:family="text" style:name="T1425">
      <style:text-properties fo:color="#1f1f1f" fo:font-family="Arial" style:font-family-asian="Arial" style:font-family-complex="Arial" fo:font-size="12pt"/>
    </style:style>
    <style:style style:parent-style-name="950" style:family="paragraph" style:name="P7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26">
      <style:text-properties fo:color="#1f1f1f" fo:font-family="Arial" style:font-family-asian="Arial" style:font-family-complex="Arial" fo:font-size="12pt" fo:font-weight="bold"/>
    </style:style>
    <style:style style:family="paragraph" style:name="P733">
      <style:paragraph-properties fo:line-height="115%" fo:margin-left="0cm" fo:margin-right="0cm" fo:text-indent="0cm" fo:margin-top="0pt" fo:margin-bottom="0pt" fo:border="none"/>
      <style:text-properties/>
    </style:style>
    <style:style style:family="text" style:name="T1427">
      <style:text-properties fo:color="#1f1f1f" fo:font-family="Arial" style:font-family-asian="Arial" style:font-family-complex="Arial" fo:font-size="12pt"/>
    </style:style>
    <style:style style:family="text" style:name="T1428">
      <style:text-properties fo:color="#1f1f1f" fo:font-family="Arial" style:font-family-asian="Arial" style:font-family-complex="Arial" fo:font-size="12pt"/>
    </style:style>
    <style:style style:parent-style-name="950" style:family="paragraph" style:name="P73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29">
      <style:text-properties fo:color="#1f1f1f" fo:font-family="Arial" style:font-family-asian="Arial" style:font-family-complex="Arial" fo:font-size="12pt" fo:font-weight="bold"/>
    </style:style>
    <style:style style:family="paragraph" style:name="P735">
      <style:paragraph-properties fo:line-height="115%" fo:margin-left="0cm" fo:margin-right="0cm" fo:text-indent="0cm" fo:margin-top="0pt" fo:margin-bottom="0pt" fo:border="none"/>
      <style:text-properties/>
    </style:style>
    <style:style style:family="text" style:name="T1430">
      <style:text-properties fo:color="#1f1f1f" fo:font-family="Arial" style:font-family-asian="Arial" style:font-family-complex="Arial" fo:font-size="12pt"/>
    </style:style>
    <style:style style:parent-style-name="949" style:family="paragraph" style:name="P73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31">
      <style:text-properties fo:color="#1f1f1f" fo:font-family="Arial" style:font-family-asian="Arial" style:font-family-complex="Arial" fo:font-size="14pt" fo:font-weight="bold"/>
    </style:style>
    <style:style style:parent-style-name="1010" style:list-style-name="WWNum50" style:family="paragraph" style:name="P737">
      <style:paragraph-properties fo:line-height="115%" fo:margin-right="0cm" fo:margin-top="0pt" fo:margin-bottom="0pt" fo:border="none"/>
      <style:text-properties/>
    </style:style>
    <style:style style:family="text" style:name="T1432">
      <style:text-properties fo:color="#1f1f1f" fo:font-family="Arial" style:font-family-asian="Arial" style:font-family-complex="Arial" fo:font-size="12pt"/>
    </style:style>
    <style:style style:parent-style-name="1010" style:list-style-name="WWNum50" style:family="paragraph" style:name="P738">
      <style:paragraph-properties fo:line-height="115%" fo:margin-right="0cm" fo:margin-top="0pt" fo:margin-bottom="0pt" fo:border="none"/>
      <style:text-properties/>
    </style:style>
    <style:style style:family="text" style:name="T1433">
      <style:text-properties fo:color="#1f1f1f" fo:font-family="Arial" style:font-family-asian="Arial" style:font-family-complex="Arial" fo:font-size="12pt"/>
    </style:style>
    <style:style style:parent-style-name="1010" style:list-style-name="WWNum50" style:family="paragraph" style:name="P739">
      <style:paragraph-properties fo:line-height="115%" fo:margin-right="0cm" fo:margin-top="0pt" fo:margin-bottom="0pt" fo:border="none"/>
      <style:text-properties/>
    </style:style>
    <style:style style:family="text" style:name="T1434">
      <style:text-properties fo:color="#1f1f1f" fo:font-family="Arial" style:font-family-asian="Arial" style:font-family-complex="Arial" fo:font-size="12pt"/>
    </style:style>
    <style:style style:parent-style-name="1010" style:list-style-name="WWNum50" style:family="paragraph" style:name="P740">
      <style:paragraph-properties fo:line-height="115%" fo:margin-right="0cm" fo:margin-top="0pt" fo:margin-bottom="0pt" fo:border="none"/>
      <style:text-properties/>
    </style:style>
    <style:style style:family="text" style:name="T1435">
      <style:text-properties fo:color="#1f1f1f" fo:font-family="Arial" style:font-family-asian="Arial" style:font-family-complex="Arial" fo:font-size="12pt"/>
    </style:style>
    <style:style style:family="paragraph" style:name="P741">
      <style:paragraph-properties/>
      <style:text-properties/>
    </style:style>
    <style:style style:family="paragraph" style:name="P742">
      <style:paragraph-properties fo:line-height="115%" fo:margin-left="0cm" fo:margin-right="0cm" fo:text-indent="0cm" fo:margin-top="0pt" fo:margin-bottom="0pt" fo:break-before="page" fo:border="none"/>
      <style:text-properties/>
    </style:style>
    <style:style style:family="text" style:name="T1436">
      <style:text-properties fo:color="#1f1f1f" fo:font-family="Arial" style:font-family-asian="Arial" style:font-family-complex="Arial" fo:font-size="12pt"/>
    </style:style>
    <style:style style:parent-style-name="949" style:family="paragraph" style:name="P74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37">
      <style:text-properties fo:color="#1f1f1f" fo:font-family="Arial" style:font-family-asian="Arial" style:font-family-complex="Arial" fo:font-size="14pt" fo:font-weight="bold"/>
    </style:style>
    <style:style style:family="paragraph" style:name="P744">
      <style:paragraph-properties fo:line-height="115%" fo:margin-left="0cm" fo:margin-right="0cm" fo:text-indent="0cm" fo:margin-top="0pt" fo:margin-bottom="0pt" fo:border="none"/>
      <style:text-properties/>
    </style:style>
    <style:style style:family="text" style:name="T1438">
      <style:text-properties fo:color="#1f1f1f" fo:font-family="Arial" style:font-family-asian="Arial" style:font-family-complex="Arial" fo:font-size="12pt"/>
    </style:style>
    <style:style style:parent-style-name="950" style:family="paragraph" style:name="P7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39">
      <style:text-properties fo:color="#1f1f1f" fo:font-family="Arial" style:font-family-asian="Arial" style:font-family-complex="Arial" fo:font-size="12pt" fo:font-weight="bold"/>
    </style:style>
    <style:style style:family="paragraph" style:name="P746">
      <style:paragraph-properties fo:line-height="115%" fo:margin-left="0cm" fo:margin-right="0cm" fo:text-indent="0cm" fo:margin-top="0pt" fo:margin-bottom="0pt" fo:border="none"/>
      <style:text-properties/>
    </style:style>
    <style:style style:family="text" style:name="T1440">
      <style:text-properties fo:color="#1f1f1f" fo:font-family="Arial" style:font-family-asian="Arial" style:font-family-complex="Arial" fo:font-size="12pt"/>
    </style:style>
    <style:style style:parent-style-name="950" style:family="paragraph" style:name="P7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41">
      <style:text-properties fo:color="#1f1f1f" fo:font-family="Arial" style:font-family-asian="Arial" style:font-family-complex="Arial" fo:font-size="12pt" fo:font-weight="bold"/>
    </style:style>
    <style:style style:family="paragraph" style:name="P748">
      <style:paragraph-properties fo:line-height="115%" fo:margin-left="0cm" fo:margin-right="0cm" fo:text-indent="0cm" fo:margin-top="0pt" fo:margin-bottom="0pt" fo:border="none"/>
      <style:text-properties/>
    </style:style>
    <style:style style:family="text" style:name="T1442">
      <style:text-properties fo:color="#1f1f1f" fo:font-family="Arial" style:font-family-asian="Arial" style:font-family-complex="Arial" fo:font-size="12pt"/>
    </style:style>
    <style:style style:parent-style-name="950" style:family="paragraph" style:name="P74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43">
      <style:text-properties fo:color="#1f1f1f" fo:font-family="Arial" style:font-family-asian="Arial" style:font-family-complex="Arial" fo:font-size="12pt" fo:font-weight="bold"/>
    </style:style>
    <style:style style:family="paragraph" style:name="P750">
      <style:paragraph-properties fo:line-height="115%" fo:margin-left="0cm" fo:margin-right="0cm" fo:text-indent="0cm" fo:margin-top="0pt" fo:margin-bottom="0pt" fo:border="none"/>
      <style:text-properties/>
    </style:style>
    <style:style style:family="text" style:name="T1444">
      <style:text-properties fo:color="#1f1f1f" fo:font-family="Arial" style:font-family-asian="Arial" style:font-family-complex="Arial" fo:font-size="12pt"/>
    </style:style>
    <style:style style:parent-style-name="950" style:family="paragraph" style:name="P75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45">
      <style:text-properties fo:color="#1f1f1f" fo:font-family="Arial" style:font-family-asian="Arial" style:font-family-complex="Arial" fo:font-size="12pt" fo:font-weight="bold"/>
    </style:style>
    <style:style style:family="paragraph" style:name="P752">
      <style:paragraph-properties fo:line-height="115%" fo:margin-left="0cm" fo:margin-right="0cm" fo:text-indent="0cm" fo:margin-top="0pt" fo:margin-bottom="0pt" fo:border="none"/>
      <style:text-properties/>
    </style:style>
    <style:style style:family="text" style:name="T1446">
      <style:text-properties fo:color="#1f1f1f" fo:font-family="Arial" style:font-family-asian="Arial" style:font-family-complex="Arial" fo:font-size="12pt"/>
    </style:style>
    <style:style style:parent-style-name="949" style:family="paragraph" style:name="P75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47">
      <style:text-properties fo:color="#1f1f1f" fo:font-family="Arial" style:font-family-asian="Arial" style:font-family-complex="Arial" fo:font-size="14pt" fo:font-weight="bold"/>
    </style:style>
    <style:style style:parent-style-name="1010" style:list-style-name="WWNum51" style:family="paragraph" style:name="P754">
      <style:paragraph-properties fo:line-height="115%" fo:margin-right="0cm" fo:margin-top="0pt" fo:margin-bottom="0pt" fo:border="none"/>
      <style:text-properties/>
    </style:style>
    <style:style style:family="text" style:name="T1448">
      <style:text-properties fo:color="#1f1f1f" fo:font-family="Arial" style:font-family-asian="Arial" style:font-family-complex="Arial" fo:font-size="12pt"/>
    </style:style>
    <style:style style:parent-style-name="1010" style:list-style-name="WWNum51" style:family="paragraph" style:name="P755">
      <style:paragraph-properties fo:line-height="115%" fo:margin-right="0cm" fo:margin-top="0pt" fo:margin-bottom="0pt" fo:border="none"/>
      <style:text-properties/>
    </style:style>
    <style:style style:family="text" style:name="T1449">
      <style:text-properties fo:color="#1f1f1f" fo:font-family="Arial" style:font-family-asian="Arial" style:font-family-complex="Arial" fo:font-size="12pt"/>
    </style:style>
    <style:style style:parent-style-name="1010" style:list-style-name="WWNum51" style:family="paragraph" style:name="P756">
      <style:paragraph-properties fo:line-height="115%" fo:margin-right="0cm" fo:margin-top="0pt" fo:margin-bottom="0pt" fo:border="none"/>
      <style:text-properties/>
    </style:style>
    <style:style style:family="text" style:name="T1450">
      <style:text-properties fo:color="#1f1f1f" fo:font-family="Arial" style:font-family-asian="Arial" style:font-family-complex="Arial" fo:font-size="12pt"/>
    </style:style>
    <style:style style:parent-style-name="1010" style:list-style-name="WWNum51" style:family="paragraph" style:name="P757">
      <style:paragraph-properties fo:line-height="115%" fo:margin-right="0cm" fo:margin-top="0pt" fo:margin-bottom="0pt" fo:border="none"/>
      <style:text-properties/>
    </style:style>
    <style:style style:family="text" style:name="T1451">
      <style:text-properties fo:color="#1f1f1f" fo:font-family="Arial" style:font-family-asian="Arial" style:font-family-complex="Arial" fo:font-size="12pt"/>
    </style:style>
    <style:style style:family="paragraph" style:name="P758">
      <style:paragraph-properties/>
      <style:text-properties/>
    </style:style>
    <style:style style:parent-style-name="949" style:family="paragraph" style:name="P75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452">
      <style:text-properties fo:color="#1f1f1f" fo:font-family="Arial" style:font-family-asian="Arial" style:font-family-complex="Arial" fo:font-size="14pt" fo:font-weight="bold"/>
    </style:style>
    <style:style style:family="paragraph" style:name="P760">
      <style:paragraph-properties fo:line-height="115%" fo:margin-left="0cm" fo:margin-right="0cm" fo:text-indent="0cm" fo:margin-top="0pt" fo:margin-bottom="0pt" fo:border="none"/>
      <style:text-properties/>
    </style:style>
    <style:style style:family="text" style:name="T1453">
      <style:text-properties fo:color="#1f1f1f" fo:font-family="Arial" style:font-family-asian="Arial" style:font-family-complex="Arial" fo:font-size="12pt"/>
    </style:style>
    <style:style style:parent-style-name="950" style:family="paragraph" style:name="P76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54">
      <style:text-properties fo:color="#1f1f1f" fo:font-family="Arial" style:font-family-asian="Arial" style:font-family-complex="Arial" fo:font-size="12pt" fo:font-weight="bold"/>
    </style:style>
    <style:style style:family="paragraph" style:name="P762">
      <style:paragraph-properties fo:line-height="115%" fo:margin-left="0cm" fo:margin-right="0cm" fo:text-indent="0cm" fo:margin-top="0pt" fo:margin-bottom="0pt" fo:border="none"/>
      <style:text-properties/>
    </style:style>
    <style:style style:family="text" style:name="T1455">
      <style:text-properties fo:color="#1f1f1f" fo:font-family="Arial" style:font-family-asian="Arial" style:font-family-complex="Arial" fo:font-size="12pt"/>
    </style:style>
    <style:style style:parent-style-name="950" style:family="paragraph" style:name="P76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56">
      <style:text-properties fo:color="#1f1f1f" fo:font-family="Arial" style:font-family-asian="Arial" style:font-family-complex="Arial" fo:font-size="12pt" fo:font-weight="bold"/>
    </style:style>
    <style:style style:family="paragraph" style:name="P764">
      <style:paragraph-properties fo:line-height="115%" fo:margin-left="0cm" fo:margin-right="0cm" fo:text-indent="0cm" fo:margin-top="0pt" fo:margin-bottom="0pt" fo:border="none"/>
      <style:text-properties/>
    </style:style>
    <style:style style:family="text" style:name="T1457">
      <style:text-properties fo:color="#1f1f1f" fo:font-family="Arial" style:font-family-asian="Arial" style:font-family-complex="Arial" fo:font-size="12pt"/>
    </style:style>
    <style:style style:parent-style-name="950" style:family="paragraph" style:name="P76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58">
      <style:text-properties fo:color="#1f1f1f" fo:font-family="Arial" style:font-family-asian="Arial" style:font-family-complex="Arial" fo:font-size="12pt" fo:font-weight="bold"/>
    </style:style>
    <style:style style:family="paragraph" style:name="P766">
      <style:paragraph-properties fo:line-height="115%" fo:margin-left="0cm" fo:margin-right="0cm" fo:text-indent="0cm" fo:margin-top="0pt" fo:margin-bottom="0pt" fo:border="none"/>
      <style:text-properties/>
    </style:style>
    <style:style style:family="text" style:name="T1459">
      <style:text-properties fo:color="#1f1f1f" fo:font-family="Arial" style:font-family-asian="Arial" style:font-family-complex="Arial" fo:font-size="12pt"/>
    </style:style>
    <style:style style:parent-style-name="950" style:family="paragraph" style:name="P76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60">
      <style:text-properties fo:color="#1f1f1f" fo:font-family="Arial" style:font-family-asian="Arial" style:font-family-complex="Arial" fo:font-size="12pt" fo:font-weight="bold"/>
    </style:style>
    <style:style style:family="paragraph" style:name="P768">
      <style:paragraph-properties fo:line-height="115%" fo:margin-left="0cm" fo:margin-right="0cm" fo:text-indent="0cm" fo:margin-top="0pt" fo:margin-bottom="0pt" fo:border="none"/>
      <style:text-properties/>
    </style:style>
    <style:style style:family="text" style:name="T1461">
      <style:text-properties fo:color="#1f1f1f" fo:font-family="Arial" style:font-family-asian="Arial" style:font-family-complex="Arial" fo:font-size="12pt"/>
    </style:style>
    <style:style style:parent-style-name="949" style:family="paragraph" style:name="P76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62">
      <style:text-properties fo:color="#1f1f1f" fo:font-family="Arial" style:font-family-asian="Arial" style:font-family-complex="Arial" fo:font-size="14pt" fo:font-weight="bold"/>
    </style:style>
    <style:style style:parent-style-name="1010" style:list-style-name="WWNum52" style:family="paragraph" style:name="P770">
      <style:paragraph-properties fo:line-height="115%" fo:margin-right="0cm" fo:margin-top="0pt" fo:margin-bottom="0pt" fo:border="none"/>
      <style:text-properties/>
    </style:style>
    <style:style style:family="text" style:name="T1463">
      <style:text-properties fo:color="#1f1f1f" fo:font-family="Arial" style:font-family-asian="Arial" style:font-family-complex="Arial" fo:font-size="12pt"/>
    </style:style>
    <style:style style:parent-style-name="1010" style:list-style-name="WWNum52" style:family="paragraph" style:name="P771">
      <style:paragraph-properties fo:line-height="115%" fo:margin-right="0cm" fo:margin-top="0pt" fo:margin-bottom="0pt" fo:border="none"/>
      <style:text-properties/>
    </style:style>
    <style:style style:family="text" style:name="T1464">
      <style:text-properties fo:color="#1f1f1f" fo:font-family="Arial" style:font-family-asian="Arial" style:font-family-complex="Arial" fo:font-size="12pt"/>
    </style:style>
    <style:style style:parent-style-name="1010" style:list-style-name="WWNum52" style:family="paragraph" style:name="P772">
      <style:paragraph-properties fo:line-height="115%" fo:margin-right="0cm" fo:margin-top="0pt" fo:margin-bottom="0pt" fo:border="none"/>
      <style:text-properties/>
    </style:style>
    <style:style style:family="text" style:name="T1465">
      <style:text-properties fo:color="#1f1f1f" fo:font-family="Arial" style:font-family-asian="Arial" style:font-family-complex="Arial" fo:font-size="12pt"/>
    </style:style>
    <style:style style:parent-style-name="1010" style:list-style-name="WWNum52" style:family="paragraph" style:name="P773">
      <style:paragraph-properties fo:line-height="115%" fo:margin-right="0cm" fo:margin-top="0pt" fo:margin-bottom="0pt" fo:border="none"/>
      <style:text-properties/>
    </style:style>
    <style:style style:family="text" style:name="T1466">
      <style:text-properties fo:color="#1f1f1f" fo:font-family="Arial" style:font-family-asian="Arial" style:font-family-complex="Arial" fo:font-size="12pt"/>
    </style:style>
    <style:style style:family="paragraph" style:name="P774">
      <style:paragraph-properties/>
      <style:text-properties/>
    </style:style>
    <style:style style:family="paragraph" style:name="P775">
      <style:paragraph-properties fo:line-height="115%" fo:margin-left="0cm" fo:margin-right="0cm" fo:text-indent="0cm" fo:margin-top="0pt" fo:margin-bottom="0pt" fo:break-before="page" fo:border="none"/>
      <style:text-properties/>
    </style:style>
    <style:style style:family="text" style:name="T1467">
      <style:text-properties fo:color="#1f1f1f" fo:font-family="Arial" style:font-family-asian="Arial" style:font-family-complex="Arial" fo:font-size="12pt"/>
    </style:style>
    <style:style style:parent-style-name="949" style:family="paragraph" style:name="P77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68">
      <style:text-properties fo:color="#1f1f1f" fo:font-family="Arial" style:font-family-asian="Arial" style:font-family-complex="Arial" fo:font-size="14pt" fo:font-weight="bold"/>
    </style:style>
    <style:style style:family="paragraph" style:name="P777">
      <style:paragraph-properties fo:line-height="115%" fo:margin-left="0cm" fo:margin-right="0cm" fo:text-indent="0cm" fo:margin-top="0pt" fo:margin-bottom="0pt" fo:border="none"/>
      <style:text-properties/>
    </style:style>
    <style:style style:family="text" style:name="T1469">
      <style:text-properties fo:color="#1f1f1f" fo:font-family="Arial" style:font-family-asian="Arial" style:font-family-complex="Arial" fo:font-size="12pt"/>
    </style:style>
    <style:style style:parent-style-name="950" style:family="paragraph" style:name="P77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70">
      <style:text-properties fo:color="#1f1f1f" fo:font-family="Arial" style:font-family-asian="Arial" style:font-family-complex="Arial" fo:font-size="12pt" fo:font-weight="bold"/>
    </style:style>
    <style:style style:family="paragraph" style:name="P779">
      <style:paragraph-properties fo:line-height="115%" fo:margin-left="0cm" fo:margin-right="0cm" fo:text-indent="0cm" fo:margin-top="0pt" fo:margin-bottom="0pt" fo:border="none"/>
      <style:text-properties/>
    </style:style>
    <style:style style:family="text" style:name="T1471">
      <style:text-properties fo:color="#1f1f1f" fo:font-family="Arial" style:font-family-asian="Arial" style:font-family-complex="Arial" fo:font-size="12pt"/>
    </style:style>
    <style:style style:family="text" style:name="T1472">
      <style:text-properties fo:color="#1f1f1f" fo:font-family="Arial" style:font-family-asian="Arial" style:font-family-complex="Arial" fo:font-size="12pt"/>
    </style:style>
    <style:style style:parent-style-name="950" style:family="paragraph" style:name="P78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73">
      <style:text-properties fo:color="#1f1f1f" fo:font-family="Arial" style:font-family-asian="Arial" style:font-family-complex="Arial" fo:font-size="12pt" fo:font-weight="bold"/>
    </style:style>
    <style:style style:family="paragraph" style:name="P781">
      <style:paragraph-properties fo:line-height="115%" fo:margin-left="0cm" fo:margin-right="0cm" fo:text-indent="0cm" fo:margin-top="0pt" fo:margin-bottom="0pt" fo:border="none"/>
      <style:text-properties/>
    </style:style>
    <style:style style:family="text" style:name="T1474">
      <style:text-properties fo:color="#1f1f1f" fo:font-family="Arial" style:font-family-asian="Arial" style:font-family-complex="Arial" fo:font-size="12pt"/>
    </style:style>
    <style:style style:parent-style-name="950" style:family="paragraph" style:name="P78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75">
      <style:text-properties fo:color="#1f1f1f" fo:font-family="Arial" style:font-family-asian="Arial" style:font-family-complex="Arial" fo:font-size="12pt" fo:font-weight="bold"/>
    </style:style>
    <style:style style:family="paragraph" style:name="P783">
      <style:paragraph-properties fo:line-height="115%" fo:margin-left="0cm" fo:margin-right="0cm" fo:text-indent="0cm" fo:margin-top="0pt" fo:margin-bottom="0pt" fo:border="none"/>
      <style:text-properties/>
    </style:style>
    <style:style style:family="text" style:name="T1476">
      <style:text-properties fo:color="#1f1f1f" fo:font-family="Arial" style:font-family-asian="Arial" style:font-family-complex="Arial" fo:font-size="12pt"/>
    </style:style>
    <style:style style:parent-style-name="950" style:family="paragraph" style:name="P78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77">
      <style:text-properties fo:color="#1f1f1f" fo:font-family="Arial" style:font-family-asian="Arial" style:font-family-complex="Arial" fo:font-size="12pt" fo:font-weight="bold"/>
    </style:style>
    <style:style style:family="paragraph" style:name="P785">
      <style:paragraph-properties fo:line-height="115%" fo:margin-left="0cm" fo:margin-right="0cm" fo:text-indent="0cm" fo:margin-top="0pt" fo:margin-bottom="0pt" fo:border="none"/>
      <style:text-properties/>
    </style:style>
    <style:style style:family="text" style:name="T1478">
      <style:text-properties fo:color="#1f1f1f" fo:font-family="Arial" style:font-family-asian="Arial" style:font-family-complex="Arial" fo:font-size="12pt"/>
    </style:style>
    <style:style style:parent-style-name="949" style:family="paragraph" style:name="P78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79">
      <style:text-properties fo:color="#1f1f1f" fo:font-family="Arial" style:font-family-asian="Arial" style:font-family-complex="Arial" fo:font-size="14pt" fo:font-weight="bold"/>
    </style:style>
    <style:style style:parent-style-name="1010" style:list-style-name="WWNum53" style:family="paragraph" style:name="P787">
      <style:paragraph-properties fo:line-height="115%" fo:margin-right="0cm" fo:margin-top="0pt" fo:margin-bottom="0pt" fo:border="none"/>
      <style:text-properties/>
    </style:style>
    <style:style style:family="text" style:name="T1480">
      <style:text-properties fo:color="#1f1f1f" fo:font-family="Arial" style:font-family-asian="Arial" style:font-family-complex="Arial" fo:font-size="12pt"/>
    </style:style>
    <style:style style:parent-style-name="1010" style:list-style-name="WWNum53" style:family="paragraph" style:name="P788">
      <style:paragraph-properties fo:line-height="115%" fo:margin-right="0cm" fo:margin-top="0pt" fo:margin-bottom="0pt" fo:border="none"/>
      <style:text-properties/>
    </style:style>
    <style:style style:family="text" style:name="T1481">
      <style:text-properties fo:color="#1f1f1f" fo:font-family="Arial" style:font-family-asian="Arial" style:font-family-complex="Arial" fo:font-size="12pt"/>
    </style:style>
    <style:style style:parent-style-name="1010" style:list-style-name="WWNum53" style:family="paragraph" style:name="P789">
      <style:paragraph-properties fo:line-height="115%" fo:margin-right="0cm" fo:margin-top="0pt" fo:margin-bottom="0pt" fo:border="none"/>
      <style:text-properties/>
    </style:style>
    <style:style style:family="text" style:name="T1482">
      <style:text-properties fo:color="#1f1f1f" fo:font-family="Arial" style:font-family-asian="Arial" style:font-family-complex="Arial" fo:font-size="12pt"/>
    </style:style>
    <style:style style:parent-style-name="1010" style:list-style-name="WWNum53" style:family="paragraph" style:name="P790">
      <style:paragraph-properties fo:line-height="115%" fo:margin-right="0cm" fo:margin-top="0pt" fo:margin-bottom="0pt" fo:border="none"/>
      <style:text-properties/>
    </style:style>
    <style:style style:family="text" style:name="T1483">
      <style:text-properties fo:color="#1f1f1f" fo:font-family="Arial" style:font-family-asian="Arial" style:font-family-complex="Arial" fo:font-size="12pt"/>
    </style:style>
    <style:style style:family="paragraph" style:name="P791">
      <style:paragraph-properties/>
      <style:text-properties/>
    </style:style>
    <style:style style:parent-style-name="949" style:family="paragraph" style:name="P79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484">
      <style:text-properties fo:color="#1f1f1f" fo:font-family="Arial" style:font-family-asian="Arial" style:font-family-complex="Arial" fo:font-size="14pt" fo:font-weight="bold"/>
    </style:style>
    <style:style style:family="paragraph" style:name="P793">
      <style:paragraph-properties fo:line-height="115%" fo:margin-left="0cm" fo:margin-right="0cm" fo:text-indent="0cm" fo:margin-top="0pt" fo:margin-bottom="0pt" fo:border="none"/>
      <style:text-properties/>
    </style:style>
    <style:style style:family="text" style:name="T1485">
      <style:text-properties fo:color="#1f1f1f" fo:font-family="Arial" style:font-family-asian="Arial" style:font-family-complex="Arial" fo:font-size="12pt"/>
    </style:style>
    <style:style style:parent-style-name="950" style:family="paragraph" style:name="P79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86">
      <style:text-properties fo:color="#1f1f1f" fo:font-family="Arial" style:font-family-asian="Arial" style:font-family-complex="Arial" fo:font-size="12pt" fo:font-weight="bold"/>
    </style:style>
    <style:style style:family="paragraph" style:name="P795">
      <style:paragraph-properties fo:line-height="115%" fo:margin-left="0cm" fo:margin-right="0cm" fo:text-indent="0cm" fo:margin-top="0pt" fo:margin-bottom="0pt" fo:border="none"/>
      <style:text-properties/>
    </style:style>
    <style:style style:family="text" style:name="T1487">
      <style:text-properties fo:color="#1f1f1f" fo:font-family="Arial" style:font-family-asian="Arial" style:font-family-complex="Arial" fo:font-size="12pt"/>
    </style:style>
    <style:style style:parent-style-name="950" style:family="paragraph" style:name="P79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88">
      <style:text-properties fo:color="#1f1f1f" fo:font-family="Arial" style:font-family-asian="Arial" style:font-family-complex="Arial" fo:font-size="12pt" fo:font-weight="bold"/>
    </style:style>
    <style:style style:family="paragraph" style:name="P797">
      <style:paragraph-properties fo:line-height="115%" fo:margin-left="0cm" fo:margin-right="0cm" fo:text-indent="0cm" fo:margin-top="0pt" fo:margin-bottom="0pt" fo:border="none"/>
      <style:text-properties/>
    </style:style>
    <style:style style:family="text" style:name="T1489">
      <style:text-properties fo:color="#1f1f1f" fo:font-family="Arial" style:font-family-asian="Arial" style:font-family-complex="Arial" fo:font-size="12pt"/>
    </style:style>
    <style:style style:parent-style-name="950" style:family="paragraph" style:name="P79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90">
      <style:text-properties fo:color="#1f1f1f" fo:font-family="Arial" style:font-family-asian="Arial" style:font-family-complex="Arial" fo:font-size="12pt" fo:font-weight="bold"/>
    </style:style>
    <style:style style:family="paragraph" style:name="P799">
      <style:paragraph-properties fo:line-height="115%" fo:margin-left="0cm" fo:margin-right="0cm" fo:text-indent="0cm" fo:margin-top="0pt" fo:margin-bottom="0pt" fo:border="none"/>
      <style:text-properties/>
    </style:style>
    <style:style style:family="text" style:name="T1491">
      <style:text-properties fo:color="#1f1f1f" fo:font-family="Arial" style:font-family-asian="Arial" style:font-family-complex="Arial" fo:font-size="12pt"/>
    </style:style>
    <style:style style:parent-style-name="950" style:family="paragraph" style:name="P80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492">
      <style:text-properties fo:color="#1f1f1f" fo:font-family="Arial" style:font-family-asian="Arial" style:font-family-complex="Arial" fo:font-size="12pt" fo:font-weight="bold"/>
    </style:style>
    <style:style style:family="paragraph" style:name="P801">
      <style:paragraph-properties fo:line-height="115%" fo:margin-left="0cm" fo:margin-right="0cm" fo:text-indent="0cm" fo:margin-top="0pt" fo:margin-bottom="0pt" fo:border="none"/>
      <style:text-properties/>
    </style:style>
    <style:style style:family="text" style:name="T1493">
      <style:text-properties fo:color="#1f1f1f" fo:font-family="Arial" style:font-family-asian="Arial" style:font-family-complex="Arial" fo:font-size="12pt"/>
    </style:style>
    <style:style style:parent-style-name="949" style:family="paragraph" style:name="P80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494">
      <style:text-properties fo:color="#1f1f1f" fo:font-family="Arial" style:font-family-asian="Arial" style:font-family-complex="Arial" fo:font-size="14pt" fo:font-weight="bold"/>
    </style:style>
    <style:style style:parent-style-name="1010" style:list-style-name="WWNum54" style:family="paragraph" style:name="P803">
      <style:paragraph-properties fo:line-height="115%" fo:margin-right="0cm" fo:margin-top="0pt" fo:margin-bottom="0pt" fo:border="none"/>
      <style:text-properties/>
    </style:style>
    <style:style style:family="text" style:name="T1495">
      <style:text-properties fo:color="#1f1f1f" fo:font-family="Arial" style:font-family-asian="Arial" style:font-family-complex="Arial" fo:font-size="12pt"/>
    </style:style>
    <style:style style:parent-style-name="1010" style:list-style-name="WWNum54" style:family="paragraph" style:name="P804">
      <style:paragraph-properties fo:line-height="115%" fo:margin-right="0cm" fo:margin-top="0pt" fo:margin-bottom="0pt" fo:border="none"/>
      <style:text-properties/>
    </style:style>
    <style:style style:family="text" style:name="T1496">
      <style:text-properties fo:color="#1f1f1f" fo:font-family="Arial" style:font-family-asian="Arial" style:font-family-complex="Arial" fo:font-size="12pt"/>
    </style:style>
    <style:style style:parent-style-name="1010" style:list-style-name="WWNum54" style:family="paragraph" style:name="P805">
      <style:paragraph-properties fo:line-height="115%" fo:margin-right="0cm" fo:margin-top="0pt" fo:margin-bottom="0pt" fo:border="none"/>
      <style:text-properties/>
    </style:style>
    <style:style style:family="text" style:name="T1497">
      <style:text-properties fo:color="#1f1f1f" fo:font-family="Arial" style:font-family-asian="Arial" style:font-family-complex="Arial" fo:font-size="12pt"/>
    </style:style>
    <style:style style:parent-style-name="1010" style:list-style-name="WWNum54" style:family="paragraph" style:name="P806">
      <style:paragraph-properties fo:line-height="115%" fo:margin-right="0cm" fo:margin-top="0pt" fo:margin-bottom="0pt" fo:border="none"/>
      <style:text-properties/>
    </style:style>
    <style:style style:family="text" style:name="T1498">
      <style:text-properties fo:color="#1f1f1f" fo:font-family="Arial" style:font-family-asian="Arial" style:font-family-complex="Arial" fo:font-size="12pt"/>
    </style:style>
    <style:style style:family="paragraph" style:name="P807">
      <style:paragraph-properties/>
      <style:text-properties/>
    </style:style>
    <style:style style:family="paragraph" style:name="P808">
      <style:paragraph-properties fo:line-height="115%" fo:margin-left="0cm" fo:margin-right="0cm" fo:text-indent="0cm" fo:margin-top="0pt" fo:margin-bottom="0pt" fo:break-before="page" fo:border="none"/>
      <style:text-properties/>
    </style:style>
    <style:style style:family="text" style:name="T1499">
      <style:text-properties fo:color="#1f1f1f" fo:font-family="Arial" style:font-family-asian="Arial" style:font-family-complex="Arial" fo:font-size="12pt"/>
    </style:style>
    <style:style style:parent-style-name="949" style:family="paragraph" style:name="P80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00">
      <style:text-properties fo:color="#1f1f1f" fo:font-family="Arial" style:font-family-asian="Arial" style:font-family-complex="Arial" fo:font-size="14pt" fo:font-weight="bold"/>
    </style:style>
    <style:style style:family="paragraph" style:name="P810">
      <style:paragraph-properties fo:line-height="115%" fo:margin-left="0cm" fo:margin-right="0cm" fo:text-indent="0cm" fo:margin-top="0pt" fo:margin-bottom="0pt" fo:border="none"/>
      <style:text-properties/>
    </style:style>
    <style:style style:family="text" style:name="T1501">
      <style:text-properties fo:color="#1f1f1f" fo:font-family="Arial" style:font-family-asian="Arial" style:font-family-complex="Arial" fo:font-size="12pt"/>
    </style:style>
    <style:style style:parent-style-name="950" style:family="paragraph" style:name="P81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02">
      <style:text-properties fo:color="#1f1f1f" fo:font-family="Arial" style:font-family-asian="Arial" style:font-family-complex="Arial" fo:font-size="12pt" fo:font-weight="bold"/>
    </style:style>
    <style:style style:family="paragraph" style:name="P812">
      <style:paragraph-properties fo:line-height="115%" fo:margin-left="0cm" fo:margin-right="0cm" fo:text-indent="0cm" fo:margin-top="0pt" fo:margin-bottom="0pt" fo:border="none"/>
      <style:text-properties/>
    </style:style>
    <style:style style:family="text" style:name="T1503">
      <style:text-properties fo:color="#1f1f1f" fo:font-family="Arial" style:font-family-asian="Arial" style:font-family-complex="Arial" fo:font-size="12pt"/>
    </style:style>
    <style:style style:parent-style-name="950" style:family="paragraph" style:name="P81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04">
      <style:text-properties fo:color="#1f1f1f" fo:font-family="Arial" style:font-family-asian="Arial" style:font-family-complex="Arial" fo:font-size="12pt" fo:font-weight="bold"/>
    </style:style>
    <style:style style:family="table" style:name="ta6">
      <style:paragraph-properties fo:line-height="100%" fo:margin-bottom="0pt"/>
      <style:table-properties style:width="10.8cm" fo:margin-left="0cm" table:align="left" style:use-optimal-column-width="true"/>
    </style:style>
    <style:style style:family="table-column" style:name="co15">
      <style:table-column-properties style:column-width="1.824cm" style:use-optimal-column-width="true"/>
    </style:style>
    <style:style style:family="table-column" style:name="co16">
      <style:table-column-properties style:column-width="8.979cm" style:use-optimal-column-width="true"/>
    </style:style>
    <style:style style:family="table-row" style:name="ro17">
      <style:table-row-properties/>
    </style:style>
    <style:style style:family="table-cell" style:name="ce5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14">
      <style:paragraph-properties fo:line-height="100%" fo:margin-top="0pt" fo:margin-bottom="0pt"/>
      <style:text-properties/>
    </style:style>
    <style:style style:family="text" style:name="T1505">
      <style:text-properties fo:color="#1f1f1f" fo:font-family="Arial" style:font-family-asian="Arial" style:font-family-complex="Arial" fo:font-size="12pt" fo:font-weight="bold"/>
    </style:style>
    <style:style style:family="table-cell" style:name="ce5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15">
      <style:paragraph-properties fo:line-height="100%" fo:margin-top="0pt" fo:margin-bottom="0pt"/>
      <style:text-properties/>
    </style:style>
    <style:style style:family="text" style:name="T1506">
      <style:text-properties fo:color="#1f1f1f" fo:font-family="Arial" style:font-family-asian="Arial" style:font-family-complex="Arial" fo:font-size="12pt" fo:font-weight="bold"/>
    </style:style>
    <style:style style:family="table-row" style:name="ro18">
      <style:table-row-properties/>
    </style:style>
    <style:style style:family="table-cell" style:name="ce5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16">
      <style:paragraph-properties fo:line-height="100%" fo:margin-top="0pt" fo:margin-bottom="0pt"/>
      <style:text-properties/>
    </style:style>
    <style:style style:family="text" style:name="T1507">
      <style:text-properties fo:color="#1f1f1f" fo:font-family="Arial" style:font-family-asian="Arial" style:font-family-complex="Arial" fo:font-size="12pt"/>
    </style:style>
    <style:style style:family="table-cell" style:name="ce5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17">
      <style:paragraph-properties fo:line-height="100%" fo:margin-top="0pt" fo:margin-bottom="0pt"/>
      <style:text-properties/>
    </style:style>
    <style:style style:family="text" style:name="T1508">
      <style:text-properties fo:color="#1f1f1f" fo:font-family="Arial" style:font-family-asian="Arial" style:font-family-complex="Arial" fo:font-size="12pt"/>
    </style:style>
    <style:style style:family="table-row" style:name="ro19">
      <style:table-row-properties/>
    </style:style>
    <style:style style:family="table-cell" style:name="ce5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18">
      <style:paragraph-properties fo:line-height="100%" fo:margin-top="0pt" fo:margin-bottom="0pt"/>
      <style:text-properties/>
    </style:style>
    <style:style style:family="text" style:name="T1509">
      <style:text-properties fo:color="#1f1f1f" fo:font-family="Arial" style:font-family-asian="Arial" style:font-family-complex="Arial" fo:font-size="12pt"/>
    </style:style>
    <style:style style:family="table-cell" style:name="ce5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19">
      <style:paragraph-properties fo:line-height="100%" fo:margin-top="0pt" fo:margin-bottom="0pt"/>
      <style:text-properties/>
    </style:style>
    <style:style style:family="text" style:name="T1510">
      <style:text-properties fo:color="#1f1f1f" fo:font-family="Arial" style:font-family-asian="Arial" style:font-family-complex="Arial" fo:font-size="12pt"/>
    </style:style>
    <style:style style:family="table-row" style:name="ro20">
      <style:table-row-properties/>
    </style:style>
    <style:style style:family="table-cell" style:name="ce5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20">
      <style:paragraph-properties fo:line-height="100%" fo:margin-top="0pt" fo:margin-bottom="0pt"/>
      <style:text-properties/>
    </style:style>
    <style:style style:family="text" style:name="T1511">
      <style:text-properties fo:color="#1f1f1f" fo:font-family="Arial" style:font-family-asian="Arial" style:font-family-complex="Arial" fo:font-size="12pt"/>
    </style:style>
    <style:style style:family="table-cell" style:name="ce5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21">
      <style:paragraph-properties fo:line-height="100%" fo:margin-top="0pt" fo:margin-bottom="0pt"/>
      <style:text-properties/>
    </style:style>
    <style:style style:family="text" style:name="T1512">
      <style:text-properties fo:color="#1f1f1f" fo:font-family="Arial" style:font-family-asian="Arial" style:font-family-complex="Arial" fo:font-size="12pt"/>
    </style:style>
    <style:style style:family="paragraph" style:name="P822">
      <style:paragraph-properties fo:line-height="115%" fo:margin-left="0cm" fo:margin-right="0cm" fo:text-indent="0cm" fo:margin-top="0pt" fo:margin-bottom="0pt" fo:border="none"/>
      <style:text-properties/>
    </style:style>
    <style:style style:family="text" style:name="T1513">
      <style:text-properties fo:color="#1f1f1f" fo:font-family="Arial" style:font-family-asian="Arial" style:font-family-complex="Arial" fo:font-size="12pt"/>
    </style:style>
    <style:style style:parent-style-name="950" style:family="paragraph" style:name="P82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14">
      <style:text-properties fo:color="#1f1f1f" fo:font-family="Arial" style:font-family-asian="Arial" style:font-family-complex="Arial" fo:font-size="12pt" fo:font-weight="bold"/>
    </style:style>
    <style:style style:parent-style-name="1010" style:list-style-name="WWNum55" style:family="paragraph" style:name="P824">
      <style:paragraph-properties fo:line-height="115%" fo:margin-right="0cm" fo:margin-top="0pt" fo:margin-bottom="0pt" fo:border="none"/>
      <style:text-properties/>
    </style:style>
    <style:style style:family="text" style:name="T1515">
      <style:text-properties fo:color="#1f1f1f" fo:font-family="Arial" style:font-family-asian="Arial" style:font-family-complex="Arial" fo:font-size="12pt"/>
    </style:style>
    <style:style style:parent-style-name="1010" style:list-style-name="WWNum55" style:family="paragraph" style:name="P825">
      <style:paragraph-properties fo:line-height="115%" fo:margin-right="0cm" fo:margin-top="0pt" fo:margin-bottom="0pt" fo:border="none"/>
      <style:text-properties/>
    </style:style>
    <style:style style:family="text" style:name="T1516">
      <style:text-properties fo:color="#1f1f1f" fo:font-family="Arial" style:font-family-asian="Arial" style:font-family-complex="Arial" fo:font-size="12pt"/>
    </style:style>
    <style:style style:parent-style-name="1010" style:list-style-name="WWNum55" style:family="paragraph" style:name="P826">
      <style:paragraph-properties fo:line-height="115%" fo:margin-right="0cm" fo:margin-top="0pt" fo:margin-bottom="0pt" fo:border="none"/>
      <style:text-properties/>
    </style:style>
    <style:style style:family="text" style:name="T1517">
      <style:text-properties fo:color="#1f1f1f" fo:font-family="Arial" style:font-family-asian="Arial" style:font-family-complex="Arial" fo:font-size="12pt"/>
    </style:style>
    <style:style style:parent-style-name="950" style:family="paragraph" style:name="P82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18">
      <style:text-properties fo:color="#1f1f1f" fo:font-family="Arial" style:font-family-asian="Arial" style:font-family-complex="Arial" fo:font-size="12pt" fo:font-weight="bold"/>
    </style:style>
    <style:style style:family="paragraph" style:name="P828">
      <style:paragraph-properties fo:line-height="115%" fo:margin-left="0cm" fo:margin-right="0cm" fo:text-indent="0cm" fo:margin-top="0pt" fo:margin-bottom="0pt" fo:border="none"/>
      <style:text-properties/>
    </style:style>
    <style:style style:family="text" style:name="T1519">
      <style:text-properties fo:color="#1f1f1f" fo:font-family="Arial" style:font-family-asian="Arial" style:font-family-complex="Arial" fo:font-size="12pt"/>
    </style:style>
    <style:style style:parent-style-name="949" style:family="paragraph" style:name="P82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20">
      <style:text-properties fo:color="#1f1f1f" fo:font-family="Arial" style:font-family-asian="Arial" style:font-family-complex="Arial" fo:font-size="14pt" fo:font-weight="bold"/>
    </style:style>
    <style:style style:parent-style-name="1010" style:list-style-name="WWNum55" style:family="paragraph" style:name="P830">
      <style:paragraph-properties fo:line-height="115%" fo:margin-right="0cm" fo:margin-top="0pt" fo:margin-bottom="0pt" fo:border="none"/>
      <style:text-properties/>
    </style:style>
    <style:style style:family="text" style:name="T1521">
      <style:text-properties fo:color="#1f1f1f" fo:font-family="Arial" style:font-family-asian="Arial" style:font-family-complex="Arial" fo:font-size="12pt"/>
    </style:style>
    <style:style style:parent-style-name="1010" style:list-style-name="WWNum55" style:family="paragraph" style:name="P831">
      <style:paragraph-properties fo:line-height="115%" fo:margin-right="0cm" fo:margin-top="0pt" fo:margin-bottom="0pt" fo:border="none"/>
      <style:text-properties/>
    </style:style>
    <style:style style:family="text" style:name="T1522">
      <style:text-properties fo:color="#1f1f1f" fo:font-family="Arial" style:font-family-asian="Arial" style:font-family-complex="Arial" fo:font-size="12pt"/>
    </style:style>
    <style:style style:parent-style-name="1010" style:list-style-name="WWNum55" style:family="paragraph" style:name="P832">
      <style:paragraph-properties fo:line-height="115%" fo:margin-right="0cm" fo:margin-top="0pt" fo:margin-bottom="0pt" fo:border="none"/>
      <style:text-properties/>
    </style:style>
    <style:style style:family="text" style:name="T1523">
      <style:text-properties fo:color="#1f1f1f" fo:font-family="Arial" style:font-family-asian="Arial" style:font-family-complex="Arial" fo:font-size="12pt"/>
    </style:style>
    <style:style style:parent-style-name="1010" style:list-style-name="WWNum55" style:family="paragraph" style:name="P833">
      <style:paragraph-properties fo:line-height="115%" fo:margin-right="0cm" fo:margin-top="0pt" fo:margin-bottom="0pt" fo:border="none"/>
      <style:text-properties/>
    </style:style>
    <style:style style:family="text" style:name="T1524">
      <style:text-properties fo:color="#1f1f1f" fo:font-family="Arial" style:font-family-asian="Arial" style:font-family-complex="Arial" fo:font-size="12pt"/>
    </style:style>
    <style:style style:family="paragraph" style:name="P834">
      <style:paragraph-properties/>
      <style:text-properties/>
    </style:style>
    <style:style style:family="paragraph" style:name="P835">
      <style:paragraph-properties fo:line-height="115%" fo:margin-left="0cm" fo:margin-right="0cm" fo:text-indent="0cm" fo:margin-top="0pt" fo:margin-bottom="0pt" fo:break-before="page" fo:border="none"/>
      <style:text-properties/>
    </style:style>
    <style:style style:family="text" style:name="T1525">
      <style:text-properties fo:color="#1f1f1f" fo:font-family="Arial" style:font-family-asian="Arial" style:font-family-complex="Arial" fo:font-size="12pt"/>
    </style:style>
    <style:style style:parent-style-name="949" style:family="paragraph" style:name="P83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26">
      <style:text-properties fo:color="#1f1f1f" fo:font-family="Arial" style:font-family-asian="Arial" style:font-family-complex="Arial" fo:font-size="14pt" fo:font-weight="bold"/>
    </style:style>
    <style:style style:family="paragraph" style:name="P837">
      <style:paragraph-properties fo:line-height="115%" fo:margin-left="0cm" fo:margin-right="0cm" fo:text-indent="0cm" fo:margin-top="0pt" fo:margin-bottom="0pt" fo:border="none"/>
      <style:text-properties/>
    </style:style>
    <style:style style:family="text" style:name="T1527">
      <style:text-properties fo:color="#1f1f1f" fo:font-family="Arial" style:font-family-asian="Arial" style:font-family-complex="Arial" fo:font-size="12pt"/>
    </style:style>
    <style:style style:parent-style-name="950" style:family="paragraph" style:name="P8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28">
      <style:text-properties fo:color="#1f1f1f" fo:font-family="Arial" style:font-family-asian="Arial" style:font-family-complex="Arial" fo:font-size="12pt" fo:font-weight="bold"/>
    </style:style>
    <style:style style:family="paragraph" style:name="P839">
      <style:paragraph-properties fo:line-height="115%" fo:margin-left="0cm" fo:margin-right="0cm" fo:text-indent="0cm" fo:margin-top="0pt" fo:margin-bottom="0pt" fo:border="none"/>
      <style:text-properties/>
    </style:style>
    <style:style style:family="text" style:name="T1529">
      <style:text-properties fo:color="#1f1f1f" fo:font-family="Arial" style:font-family-asian="Arial" style:font-family-complex="Arial" fo:font-size="12pt"/>
    </style:style>
    <style:style style:parent-style-name="950" style:family="paragraph" style:name="P8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30">
      <style:text-properties fo:color="#1f1f1f" fo:font-family="Arial" style:font-family-asian="Arial" style:font-family-complex="Arial" fo:font-size="12pt" fo:font-weight="bold"/>
    </style:style>
    <style:style style:family="paragraph" style:name="P841">
      <style:paragraph-properties fo:line-height="115%" fo:margin-left="0cm" fo:margin-right="0cm" fo:text-indent="0cm" fo:margin-top="0pt" fo:margin-bottom="0pt" fo:border="none"/>
      <style:text-properties/>
    </style:style>
    <style:style style:family="text" style:name="T1531">
      <style:text-properties fo:color="#1f1f1f" fo:font-family="Arial" style:font-family-asian="Arial" style:font-family-complex="Arial" fo:font-size="12pt"/>
    </style:style>
    <style:style style:family="paragraph" style:name="P842">
      <style:paragraph-properties fo:line-height="115%" fo:margin-left="0cm" fo:margin-right="0cm" fo:text-indent="0cm" fo:margin-top="0pt" fo:margin-bottom="0pt" fo:border="none"/>
      <style:text-properties/>
    </style:style>
    <style:style style:family="text" style:name="T1532">
      <style:text-properties fo:color="#1f1f1f" fo:font-family="Arial" style:font-family-asian="Arial" style:font-family-complex="Arial" fo:font-size="12pt"/>
    </style:style>
    <style:style style:parent-style-name="1010" style:list-style-name="WWNum56" style:family="paragraph" style:name="P843">
      <style:paragraph-properties fo:line-height="115%" fo:margin-right="0cm" fo:margin-top="0pt" fo:margin-bottom="0pt" fo:border="none"/>
      <style:text-properties/>
    </style:style>
    <style:style style:family="text" style:name="T1533">
      <style:text-properties fo:color="#1f1f1f" fo:font-family="Arial" style:font-family-asian="Arial" style:font-family-complex="Arial" fo:font-size="12pt"/>
    </style:style>
    <style:style style:parent-style-name="1010" style:list-style-name="WWNum56" style:family="paragraph" style:name="P844">
      <style:paragraph-properties fo:line-height="115%" fo:margin-right="0cm" fo:margin-top="0pt" fo:margin-bottom="0pt" fo:border="none"/>
      <style:text-properties/>
    </style:style>
    <style:style style:family="text" style:name="T1534">
      <style:text-properties fo:color="#1f1f1f" fo:font-family="Arial" style:font-family-asian="Arial" style:font-family-complex="Arial" fo:font-size="12pt"/>
    </style:style>
    <style:style style:parent-style-name="1010" style:list-style-name="WWNum56" style:family="paragraph" style:name="P845">
      <style:paragraph-properties fo:line-height="115%" fo:margin-right="0cm" fo:margin-top="0pt" fo:margin-bottom="0pt" fo:border="none"/>
      <style:text-properties/>
    </style:style>
    <style:style style:family="text" style:name="T1535">
      <style:text-properties fo:color="#1f1f1f" fo:font-family="Arial" style:font-family-asian="Arial" style:font-family-complex="Arial" fo:font-size="12pt"/>
    </style:style>
    <style:style style:parent-style-name="950" style:family="paragraph" style:name="P84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36">
      <style:text-properties fo:color="#1f1f1f" fo:font-family="Arial" style:font-family-asian="Arial" style:font-family-complex="Arial" fo:font-size="12pt" fo:font-weight="bold"/>
    </style:style>
    <style:style style:family="paragraph" style:name="P847">
      <style:paragraph-properties fo:line-height="115%" fo:margin-left="0cm" fo:margin-right="0cm" fo:text-indent="0cm" fo:margin-top="0pt" fo:margin-bottom="0pt" fo:border="none"/>
      <style:text-properties/>
    </style:style>
    <style:style style:family="text" style:name="T1537">
      <style:text-properties fo:color="#1f1f1f" fo:font-family="Arial" style:font-family-asian="Arial" style:font-family-complex="Arial" fo:font-size="12pt"/>
    </style:style>
    <style:style style:parent-style-name="950" style:family="paragraph" style:name="P8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38">
      <style:text-properties fo:color="#1f1f1f" fo:font-family="Arial" style:font-family-asian="Arial" style:font-family-complex="Arial" fo:font-size="12pt" fo:font-weight="bold"/>
    </style:style>
    <style:style style:family="paragraph" style:name="P849">
      <style:paragraph-properties fo:line-height="115%" fo:margin-left="0cm" fo:margin-right="0cm" fo:text-indent="0cm" fo:margin-top="0pt" fo:margin-bottom="0pt" fo:border="none"/>
      <style:text-properties/>
    </style:style>
    <style:style style:family="text" style:name="T1539">
      <style:text-properties fo:color="#1f1f1f" fo:font-family="Arial" style:font-family-asian="Arial" style:font-family-complex="Arial" fo:font-size="12pt"/>
    </style:style>
    <style:style style:parent-style-name="949" style:family="paragraph" style:name="P85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40">
      <style:text-properties fo:color="#1f1f1f" fo:font-family="Arial" style:font-family-asian="Arial" style:font-family-complex="Arial" fo:font-size="14pt" fo:font-weight="bold"/>
    </style:style>
    <style:style style:parent-style-name="1010" style:list-style-name="WWNum56" style:family="paragraph" style:name="P851">
      <style:paragraph-properties fo:line-height="115%" fo:margin-right="0cm" fo:margin-top="0pt" fo:margin-bottom="0pt" fo:border="none"/>
      <style:text-properties/>
    </style:style>
    <style:style style:family="text" style:name="T1541">
      <style:text-properties fo:color="#1f1f1f" fo:font-family="Arial" style:font-family-asian="Arial" style:font-family-complex="Arial" fo:font-size="12pt"/>
    </style:style>
    <style:style style:parent-style-name="1010" style:list-style-name="WWNum56" style:family="paragraph" style:name="P852">
      <style:paragraph-properties fo:line-height="115%" fo:margin-right="0cm" fo:margin-top="0pt" fo:margin-bottom="0pt" fo:border="none"/>
      <style:text-properties/>
    </style:style>
    <style:style style:family="text" style:name="T1542">
      <style:text-properties fo:color="#1f1f1f" fo:font-family="Arial" style:font-family-asian="Arial" style:font-family-complex="Arial" fo:font-size="12pt"/>
    </style:style>
    <style:style style:parent-style-name="1010" style:list-style-name="WWNum56" style:family="paragraph" style:name="P853">
      <style:paragraph-properties fo:line-height="115%" fo:margin-right="0cm" fo:margin-top="0pt" fo:margin-bottom="0pt" fo:border="none"/>
      <style:text-properties/>
    </style:style>
    <style:style style:family="text" style:name="T1543">
      <style:text-properties fo:color="#1f1f1f" fo:font-family="Arial" style:font-family-asian="Arial" style:font-family-complex="Arial" fo:font-size="12pt"/>
    </style:style>
    <style:style style:parent-style-name="1010" style:list-style-name="WWNum56" style:family="paragraph" style:name="P854">
      <style:paragraph-properties fo:line-height="115%" fo:margin-right="0cm" fo:margin-top="0pt" fo:margin-bottom="0pt" fo:border="none"/>
      <style:text-properties/>
    </style:style>
    <style:style style:family="text" style:name="T1544">
      <style:text-properties fo:color="#1f1f1f" fo:font-family="Arial" style:font-family-asian="Arial" style:font-family-complex="Arial" fo:font-size="12pt"/>
    </style:style>
    <style:style style:family="paragraph" style:name="P855">
      <style:paragraph-properties/>
      <style:text-properties/>
    </style:style>
    <style:style style:parent-style-name="949" style:family="paragraph" style:name="P85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545">
      <style:text-properties fo:color="#1f1f1f" fo:font-family="Arial" style:font-family-asian="Arial" style:font-family-complex="Arial" fo:font-size="14pt" fo:font-weight="bold"/>
    </style:style>
    <style:style style:family="paragraph" style:name="P857">
      <style:paragraph-properties fo:line-height="115%" fo:margin-left="0cm" fo:margin-right="0cm" fo:text-indent="0cm" fo:margin-top="0pt" fo:margin-bottom="0pt" fo:border="none"/>
      <style:text-properties/>
    </style:style>
    <style:style style:family="text" style:name="T1546">
      <style:text-properties fo:color="#1f1f1f" fo:font-family="Arial" style:font-family-asian="Arial" style:font-family-complex="Arial" fo:font-size="12pt"/>
    </style:style>
    <style:style style:family="paragraph" style:name="P858">
      <style:paragraph-properties fo:line-height="115%" fo:margin-left="0cm" fo:margin-right="0cm" fo:text-indent="0cm" fo:margin-top="0pt" fo:margin-bottom="0pt" fo:border="none"/>
      <style:text-properties/>
    </style:style>
    <style:style style:family="text" style:name="T1547">
      <style:text-properties fo:color="#1f1f1f" fo:font-family="Arial" style:font-family-asian="Arial" style:font-family-complex="Arial" fo:font-size="12pt"/>
    </style:style>
    <style:style style:family="paragraph" style:name="P859">
      <style:paragraph-properties fo:line-height="115%" fo:margin-left="0cm" fo:margin-right="0cm" fo:text-indent="0cm" fo:margin-top="0pt" fo:margin-bottom="0pt" fo:border="none"/>
      <style:text-properties/>
    </style:style>
    <style:style style:family="text" style:name="T1548">
      <style:text-properties fo:color="#1f1f1f" fo:font-family="Arial" style:font-family-asian="Arial" style:font-family-complex="Arial" fo:font-size="12pt"/>
    </style:style>
    <style:style style:family="paragraph" style:name="P860">
      <style:paragraph-properties fo:line-height="115%" fo:margin-left="0cm" fo:margin-right="0cm" fo:text-indent="0cm" fo:margin-top="0pt" fo:margin-bottom="0pt" fo:border="none"/>
      <style:text-properties/>
    </style:style>
    <style:style style:family="text" style:name="T1549">
      <style:text-properties fo:color="#1f1f1f" fo:font-family="Arial" style:font-family-asian="Arial" style:font-family-complex="Arial" fo:font-size="12pt"/>
    </style:style>
    <style:style style:family="paragraph" style:name="P861">
      <style:paragraph-properties fo:line-height="115%" fo:margin-left="0cm" fo:margin-right="0cm" fo:text-indent="0cm" fo:margin-top="0pt" fo:margin-bottom="0pt" fo:border="none"/>
      <style:text-properties/>
    </style:style>
    <style:style style:family="text" style:name="T1550">
      <style:text-properties fo:color="#1f1f1f" fo:font-family="Arial" style:font-family-asian="Arial" style:font-family-complex="Arial" fo:font-size="12pt"/>
    </style:style>
    <style:style style:parent-style-name="949" style:family="paragraph" style:name="P8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51">
      <style:text-properties fo:color="#1f1f1f" fo:font-family="Arial" style:font-family-asian="Arial" style:font-family-complex="Arial" fo:font-size="14pt" fo:font-weight="bold"/>
    </style:style>
    <style:style style:parent-style-name="1010" style:list-style-name="WWNum57" style:family="paragraph" style:name="P863">
      <style:paragraph-properties fo:line-height="115%" fo:margin-right="0cm" fo:margin-top="0pt" fo:margin-bottom="0pt" fo:border="none"/>
      <style:text-properties/>
    </style:style>
    <style:style style:family="text" style:name="T1552">
      <style:text-properties fo:color="#1f1f1f" fo:font-family="Arial" style:font-family-asian="Arial" style:font-family-complex="Arial" fo:font-size="12pt"/>
    </style:style>
    <style:style style:parent-style-name="1010" style:list-style-name="WWNum57" style:family="paragraph" style:name="P864">
      <style:paragraph-properties fo:line-height="115%" fo:margin-right="0cm" fo:margin-top="0pt" fo:margin-bottom="0pt" fo:border="none"/>
      <style:text-properties/>
    </style:style>
    <style:style style:family="text" style:name="T1553">
      <style:text-properties fo:color="#1f1f1f" fo:font-family="Arial" style:font-family-asian="Arial" style:font-family-complex="Arial" fo:font-size="12pt"/>
    </style:style>
    <style:style style:parent-style-name="1010" style:list-style-name="WWNum57" style:family="paragraph" style:name="P865">
      <style:paragraph-properties fo:line-height="115%" fo:margin-right="0cm" fo:margin-top="0pt" fo:margin-bottom="0pt" fo:border="none"/>
      <style:text-properties/>
    </style:style>
    <style:style style:family="text" style:name="T1554">
      <style:text-properties fo:color="#1f1f1f" fo:font-family="Arial" style:font-family-asian="Arial" style:font-family-complex="Arial" fo:font-size="12pt"/>
    </style:style>
    <style:style style:parent-style-name="1010" style:list-style-name="WWNum57" style:family="paragraph" style:name="P866">
      <style:paragraph-properties fo:line-height="115%" fo:margin-right="0cm" fo:margin-top="0pt" fo:margin-bottom="0pt" fo:border="none"/>
      <style:text-properties/>
    </style:style>
    <style:style style:family="text" style:name="T1555">
      <style:text-properties fo:color="#1f1f1f" fo:font-family="Arial" style:font-family-asian="Arial" style:font-family-complex="Arial" fo:font-size="12pt"/>
    </style:style>
    <style:style style:family="paragraph" style:name="P867">
      <style:paragraph-properties/>
      <style:text-properties/>
    </style:style>
    <style:style style:family="paragraph" style:name="P868">
      <style:paragraph-properties fo:line-height="115%" fo:margin-left="0cm" fo:margin-right="0cm" fo:text-indent="0cm" fo:margin-top="0pt" fo:margin-bottom="0pt" fo:break-before="page" fo:border="none"/>
      <style:text-properties/>
    </style:style>
    <style:style style:family="text" style:name="T1556">
      <style:text-properties fo:color="#1f1f1f" fo:font-family="Arial" style:font-family-asian="Arial" style:font-family-complex="Arial" fo:font-size="12pt"/>
    </style:style>
    <style:style style:parent-style-name="949" style:family="paragraph" style:name="P86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57">
      <style:text-properties fo:color="#1f1f1f" fo:font-family="Arial" style:font-family-asian="Arial" style:font-family-complex="Arial" fo:font-size="14pt" fo:font-weight="bold"/>
    </style:style>
    <style:style style:family="paragraph" style:name="P870">
      <style:paragraph-properties fo:line-height="115%" fo:margin-left="0cm" fo:margin-right="0cm" fo:text-indent="0cm" fo:margin-top="0pt" fo:margin-bottom="0pt" fo:border="none"/>
      <style:text-properties/>
    </style:style>
    <style:style style:family="text" style:name="T1558">
      <style:text-properties fo:color="#1f1f1f" fo:font-family="Arial" style:font-family-asian="Arial" style:font-family-complex="Arial" fo:font-size="12pt"/>
    </style:style>
    <style:style style:parent-style-name="950" style:family="paragraph" style:name="P87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59">
      <style:text-properties fo:color="#1f1f1f" fo:font-family="Arial" style:font-family-asian="Arial" style:font-family-complex="Arial" fo:font-size="12pt" fo:font-weight="bold"/>
    </style:style>
    <style:style style:family="paragraph" style:name="P872">
      <style:paragraph-properties fo:line-height="115%" fo:margin-left="0cm" fo:margin-right="0cm" fo:text-indent="0cm" fo:margin-top="0pt" fo:margin-bottom="0pt" fo:border="none"/>
      <style:text-properties/>
    </style:style>
    <style:style style:family="text" style:name="T1560">
      <style:text-properties fo:color="#1f1f1f" fo:font-family="Arial" style:font-family-asian="Arial" style:font-family-complex="Arial" fo:font-size="12pt"/>
    </style:style>
    <style:style style:parent-style-name="950" style:family="paragraph" style:name="P87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61">
      <style:text-properties fo:color="#1f1f1f" fo:font-family="Arial" style:font-family-asian="Arial" style:font-family-complex="Arial" fo:font-size="12pt" fo:font-weight="bold"/>
    </style:style>
    <style:style style:family="paragraph" style:name="P874">
      <style:paragraph-properties fo:line-height="115%" fo:margin-left="0cm" fo:margin-right="0cm" fo:text-indent="0cm" fo:margin-top="0pt" fo:margin-bottom="0pt" fo:border="none"/>
      <style:text-properties/>
    </style:style>
    <style:style style:family="text" style:name="T1562">
      <style:text-properties fo:color="#1f1f1f" fo:font-family="Arial" style:font-family-asian="Arial" style:font-family-complex="Arial" fo:font-size="12pt"/>
    </style:style>
    <style:style style:parent-style-name="950" style:family="paragraph" style:name="P87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63">
      <style:text-properties fo:color="#1f1f1f" fo:font-family="Arial" style:font-family-asian="Arial" style:font-family-complex="Arial" fo:font-size="12pt" fo:font-weight="bold"/>
    </style:style>
    <style:style style:family="paragraph" style:name="P876">
      <style:paragraph-properties fo:line-height="115%" fo:margin-left="0cm" fo:margin-right="0cm" fo:text-indent="0cm" fo:margin-top="0pt" fo:margin-bottom="0pt" fo:border="none"/>
      <style:text-properties/>
    </style:style>
    <style:style style:family="text" style:name="T1564">
      <style:text-properties fo:color="#1f1f1f" fo:font-family="Arial" style:font-family-asian="Arial" style:font-family-complex="Arial" fo:font-size="12pt"/>
    </style:style>
    <style:style style:parent-style-name="950" style:family="paragraph" style:name="P87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65">
      <style:text-properties fo:color="#1f1f1f" fo:font-family="Arial" style:font-family-asian="Arial" style:font-family-complex="Arial" fo:font-size="12pt" fo:font-weight="bold"/>
    </style:style>
    <style:style style:family="paragraph" style:name="P878">
      <style:paragraph-properties fo:line-height="115%" fo:margin-left="0cm" fo:margin-right="0cm" fo:text-indent="0cm" fo:margin-top="0pt" fo:margin-bottom="0pt" fo:border="none"/>
      <style:text-properties/>
    </style:style>
    <style:style style:family="text" style:name="T1566">
      <style:text-properties fo:color="#1f1f1f" fo:font-family="Arial" style:font-family-asian="Arial" style:font-family-complex="Arial" fo:font-size="12pt"/>
    </style:style>
    <style:style style:parent-style-name="949" style:family="paragraph" style:name="P87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67">
      <style:text-properties fo:color="#1f1f1f" fo:font-family="Arial" style:font-family-asian="Arial" style:font-family-complex="Arial" fo:font-size="14pt" fo:font-weight="bold"/>
    </style:style>
    <style:style style:parent-style-name="1010" style:list-style-name="WWNum58" style:family="paragraph" style:name="P880">
      <style:paragraph-properties fo:line-height="115%" fo:margin-right="0cm" fo:margin-top="0pt" fo:margin-bottom="0pt" fo:border="none"/>
      <style:text-properties/>
    </style:style>
    <style:style style:family="text" style:name="T1568">
      <style:text-properties fo:color="#1f1f1f" fo:font-family="Arial" style:font-family-asian="Arial" style:font-family-complex="Arial" fo:font-size="12pt"/>
    </style:style>
    <style:style style:parent-style-name="1010" style:list-style-name="WWNum58" style:family="paragraph" style:name="P881">
      <style:paragraph-properties fo:line-height="115%" fo:margin-right="0cm" fo:margin-top="0pt" fo:margin-bottom="0pt" fo:border="none"/>
      <style:text-properties/>
    </style:style>
    <style:style style:family="text" style:name="T1569">
      <style:text-properties fo:color="#1f1f1f" fo:font-family="Arial" style:font-family-asian="Arial" style:font-family-complex="Arial" fo:font-size="12pt"/>
    </style:style>
    <style:style style:parent-style-name="1010" style:list-style-name="WWNum58" style:family="paragraph" style:name="P882">
      <style:paragraph-properties fo:line-height="115%" fo:margin-right="0cm" fo:margin-top="0pt" fo:margin-bottom="0pt" fo:border="none"/>
      <style:text-properties/>
    </style:style>
    <style:style style:family="text" style:name="T1570">
      <style:text-properties fo:color="#1f1f1f" fo:font-family="Arial" style:font-family-asian="Arial" style:font-family-complex="Arial" fo:font-size="12pt"/>
    </style:style>
    <style:style style:parent-style-name="1010" style:list-style-name="WWNum58" style:family="paragraph" style:name="P883">
      <style:paragraph-properties fo:line-height="115%" fo:margin-right="0cm" fo:margin-top="0pt" fo:margin-bottom="0pt" fo:border="none"/>
      <style:text-properties/>
    </style:style>
    <style:style style:family="text" style:name="T1571">
      <style:text-properties fo:color="#1f1f1f" fo:font-family="Arial" style:font-family-asian="Arial" style:font-family-complex="Arial" fo:font-size="12pt"/>
    </style:style>
    <style:style style:family="paragraph" style:name="P884">
      <style:paragraph-properties/>
      <style:text-properties/>
    </style:style>
    <style:style style:parent-style-name="949" style:family="paragraph" style:name="P885">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572">
      <style:text-properties fo:color="#1f1f1f" fo:font-family="Arial" style:font-family-asian="Arial" style:font-family-complex="Arial" fo:font-size="14pt" fo:font-weight="bold"/>
    </style:style>
    <style:style style:family="paragraph" style:name="P886">
      <style:paragraph-properties fo:line-height="115%" fo:margin-left="0cm" fo:margin-right="0cm" fo:text-indent="0cm" fo:margin-top="0pt" fo:margin-bottom="0pt" fo:border="none"/>
      <style:text-properties/>
    </style:style>
    <style:style style:family="text" style:name="T1573">
      <style:text-properties fo:color="#1f1f1f" fo:font-family="Arial" style:font-family-asian="Arial" style:font-family-complex="Arial" fo:font-size="12pt"/>
    </style:style>
    <style:style style:parent-style-name="950" style:family="paragraph" style:name="P88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74">
      <style:text-properties fo:color="#1f1f1f" fo:font-family="Arial" style:font-family-asian="Arial" style:font-family-complex="Arial" fo:font-size="12pt" fo:font-weight="bold"/>
    </style:style>
    <style:style style:family="paragraph" style:name="P888">
      <style:paragraph-properties fo:line-height="115%" fo:margin-left="0cm" fo:margin-right="0cm" fo:text-indent="0cm" fo:margin-top="0pt" fo:margin-bottom="0pt" fo:border="none"/>
      <style:text-properties/>
    </style:style>
    <style:style style:family="text" style:name="T1575">
      <style:text-properties fo:color="#1f1f1f" fo:font-family="Arial" style:font-family-asian="Arial" style:font-family-complex="Arial" fo:font-size="12pt"/>
    </style:style>
    <style:style style:parent-style-name="950" style:family="paragraph" style:name="P8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76">
      <style:text-properties fo:color="#1f1f1f" fo:font-family="Arial" style:font-family-asian="Arial" style:font-family-complex="Arial" fo:font-size="12pt" fo:font-weight="bold"/>
    </style:style>
    <style:style style:family="paragraph" style:name="P890">
      <style:paragraph-properties fo:line-height="115%" fo:margin-left="0cm" fo:margin-right="0cm" fo:text-indent="0cm" fo:margin-top="0pt" fo:margin-bottom="0pt" fo:border="none"/>
      <style:text-properties/>
    </style:style>
    <style:style style:family="text" style:name="T1577">
      <style:text-properties fo:color="#1f1f1f" fo:font-family="Arial" style:font-family-asian="Arial" style:font-family-complex="Arial" fo:font-size="12pt"/>
    </style:style>
    <style:style style:parent-style-name="950" style:family="paragraph" style:name="P8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78">
      <style:text-properties fo:color="#1f1f1f" fo:font-family="Arial" style:font-family-asian="Arial" style:font-family-complex="Arial" fo:font-size="12pt" fo:font-weight="bold"/>
    </style:style>
    <style:style style:family="paragraph" style:name="P892">
      <style:paragraph-properties fo:line-height="115%" fo:margin-left="0cm" fo:margin-right="0cm" fo:text-indent="0cm" fo:margin-top="0pt" fo:margin-bottom="0pt" fo:border="none"/>
      <style:text-properties/>
    </style:style>
    <style:style style:family="text" style:name="T1579">
      <style:text-properties fo:color="#1f1f1f" fo:font-family="Arial" style:font-family-asian="Arial" style:font-family-complex="Arial" fo:font-size="12pt"/>
    </style:style>
    <style:style style:parent-style-name="950" style:family="paragraph" style:name="P8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80">
      <style:text-properties fo:color="#1f1f1f" fo:font-family="Arial" style:font-family-asian="Arial" style:font-family-complex="Arial" fo:font-size="12pt" fo:font-weight="bold"/>
    </style:style>
    <style:style style:family="paragraph" style:name="P894">
      <style:paragraph-properties fo:line-height="115%" fo:margin-left="0cm" fo:margin-right="0cm" fo:text-indent="0cm" fo:margin-top="0pt" fo:margin-bottom="0pt" fo:border="none"/>
      <style:text-properties/>
    </style:style>
    <style:style style:family="text" style:name="T1581">
      <style:text-properties fo:color="#1f1f1f" fo:font-family="Arial" style:font-family-asian="Arial" style:font-family-complex="Arial" fo:font-size="12pt"/>
    </style:style>
    <style:style style:family="text" style:name="T1582">
      <style:text-properties fo:color="#1f1f1f" fo:font-family="Arial" style:font-family-asian="Arial" style:font-family-complex="Arial" fo:font-size="12pt"/>
    </style:style>
    <style:style style:parent-style-name="949" style:family="paragraph" style:name="P89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83">
      <style:text-properties fo:color="#1f1f1f" fo:font-family="Arial" style:font-family-asian="Arial" style:font-family-complex="Arial" fo:font-size="14pt" fo:font-weight="bold"/>
    </style:style>
    <style:style style:parent-style-name="1010" style:list-style-name="WWNum59" style:family="paragraph" style:name="P896">
      <style:paragraph-properties fo:line-height="115%" fo:margin-right="0cm" fo:margin-top="0pt" fo:margin-bottom="0pt" fo:border="none"/>
      <style:text-properties/>
    </style:style>
    <style:style style:family="text" style:name="T1584">
      <style:text-properties fo:color="#1f1f1f" fo:font-family="Arial" style:font-family-asian="Arial" style:font-family-complex="Arial" fo:font-size="12pt"/>
    </style:style>
    <style:style style:parent-style-name="1010" style:list-style-name="WWNum59" style:family="paragraph" style:name="P897">
      <style:paragraph-properties fo:line-height="115%" fo:margin-right="0cm" fo:margin-top="0pt" fo:margin-bottom="0pt" fo:border="none"/>
      <style:text-properties/>
    </style:style>
    <style:style style:family="text" style:name="T1585">
      <style:text-properties fo:color="#1f1f1f" fo:font-family="Arial" style:font-family-asian="Arial" style:font-family-complex="Arial" fo:font-size="12pt"/>
    </style:style>
    <style:style style:parent-style-name="1010" style:list-style-name="WWNum59" style:family="paragraph" style:name="P898">
      <style:paragraph-properties fo:line-height="115%" fo:margin-right="0cm" fo:margin-top="0pt" fo:margin-bottom="0pt" fo:border="none"/>
      <style:text-properties/>
    </style:style>
    <style:style style:family="text" style:name="T1586">
      <style:text-properties fo:color="#1f1f1f" fo:font-family="Arial" style:font-family-asian="Arial" style:font-family-complex="Arial" fo:font-size="12pt"/>
    </style:style>
    <style:style style:parent-style-name="1010" style:list-style-name="WWNum59" style:family="paragraph" style:name="P899">
      <style:paragraph-properties fo:line-height="115%" fo:margin-right="0cm" fo:margin-top="0pt" fo:margin-bottom="0pt" fo:border="none"/>
      <style:text-properties/>
    </style:style>
    <style:style style:family="text" style:name="T1587">
      <style:text-properties fo:color="#1f1f1f" fo:font-family="Arial" style:font-family-asian="Arial" style:font-family-complex="Arial" fo:font-size="12pt"/>
    </style:style>
    <style:style style:family="paragraph" style:name="P900">
      <style:paragraph-properties/>
      <style:text-properties/>
    </style:style>
    <style:style style:parent-style-name="949" style:family="paragraph" style:name="P90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588">
      <style:text-properties fo:color="#1f1f1f" fo:font-family="Arial" style:font-family-asian="Arial" style:font-family-complex="Arial" fo:font-size="14pt" fo:font-weight="bold"/>
    </style:style>
    <style:style style:family="paragraph" style:name="P902">
      <style:paragraph-properties fo:line-height="115%" fo:margin-left="0cm" fo:margin-right="0cm" fo:text-indent="0cm" fo:margin-top="0pt" fo:margin-bottom="0pt" fo:border="none"/>
      <style:text-properties/>
    </style:style>
    <style:style style:family="text" style:name="T1589">
      <style:text-properties fo:color="#1f1f1f" fo:font-family="Arial" style:font-family-asian="Arial" style:font-family-complex="Arial" fo:font-size="12pt"/>
    </style:style>
    <style:style style:parent-style-name="950" style:family="paragraph" style:name="P9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90">
      <style:text-properties fo:color="#1f1f1f" fo:font-family="Arial" style:font-family-asian="Arial" style:font-family-complex="Arial" fo:font-size="12pt" fo:font-weight="bold"/>
    </style:style>
    <style:style style:family="paragraph" style:name="P904">
      <style:paragraph-properties fo:line-height="115%" fo:margin-left="0cm" fo:margin-right="0cm" fo:text-indent="0cm" fo:margin-top="0pt" fo:margin-bottom="0pt" fo:border="none"/>
      <style:text-properties/>
    </style:style>
    <style:style style:family="text" style:name="T1591">
      <style:text-properties fo:color="#1f1f1f" fo:font-family="Arial" style:font-family-asian="Arial" style:font-family-complex="Arial" fo:font-size="12pt"/>
    </style:style>
    <style:style style:parent-style-name="950" style:family="paragraph" style:name="P9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92">
      <style:text-properties fo:color="#1f1f1f" fo:font-family="Arial" style:font-family-asian="Arial" style:font-family-complex="Arial" fo:font-size="12pt" fo:font-weight="bold"/>
    </style:style>
    <style:style style:family="paragraph" style:name="P906">
      <style:paragraph-properties fo:line-height="115%" fo:margin-left="0cm" fo:margin-right="0cm" fo:text-indent="0cm" fo:margin-top="0pt" fo:margin-bottom="0pt" fo:border="none"/>
      <style:text-properties/>
    </style:style>
    <style:style style:family="text" style:name="T1593">
      <style:text-properties fo:color="#1f1f1f" fo:font-family="Arial" style:font-family-asian="Arial" style:font-family-complex="Arial" fo:font-size="12pt"/>
    </style:style>
    <style:style style:parent-style-name="950" style:family="paragraph" style:name="P90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94">
      <style:text-properties fo:color="#1f1f1f" fo:font-family="Arial" style:font-family-asian="Arial" style:font-family-complex="Arial" fo:font-size="12pt" fo:font-weight="bold"/>
    </style:style>
    <style:style style:family="paragraph" style:name="P908">
      <style:paragraph-properties fo:line-height="115%" fo:margin-left="0cm" fo:margin-right="0cm" fo:text-indent="0cm" fo:margin-top="0pt" fo:margin-bottom="0pt" fo:border="none"/>
      <style:text-properties/>
    </style:style>
    <style:style style:family="text" style:name="T1595">
      <style:text-properties fo:color="#1f1f1f" fo:font-family="Arial" style:font-family-asian="Arial" style:font-family-complex="Arial" fo:font-size="12pt"/>
    </style:style>
    <style:style style:family="text" style:name="T1596">
      <style:text-properties fo:color="#1f1f1f" fo:font-family="Arial" style:font-family-asian="Arial" style:font-family-complex="Arial" fo:font-size="12pt"/>
    </style:style>
    <style:style style:parent-style-name="950" style:family="paragraph" style:name="P90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597">
      <style:text-properties fo:color="#1f1f1f" fo:font-family="Arial" style:font-family-asian="Arial" style:font-family-complex="Arial" fo:font-size="12pt" fo:font-weight="bold"/>
    </style:style>
    <style:style style:family="paragraph" style:name="P910">
      <style:paragraph-properties fo:line-height="115%" fo:margin-left="0cm" fo:margin-right="0cm" fo:text-indent="0cm" fo:margin-top="0pt" fo:margin-bottom="0pt" fo:border="none"/>
      <style:text-properties/>
    </style:style>
    <style:style style:family="text" style:name="T1598">
      <style:text-properties fo:color="#1f1f1f" fo:font-family="Arial" style:font-family-asian="Arial" style:font-family-complex="Arial" fo:font-size="12pt"/>
    </style:style>
    <style:style style:parent-style-name="949" style:family="paragraph" style:name="P91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599">
      <style:text-properties fo:color="#1f1f1f" fo:font-family="Arial" style:font-family-asian="Arial" style:font-family-complex="Arial" fo:font-size="14pt" fo:font-weight="bold"/>
    </style:style>
    <style:style style:parent-style-name="1010" style:list-style-name="WWNum60" style:family="paragraph" style:name="P912">
      <style:paragraph-properties fo:line-height="115%" fo:margin-right="0cm" fo:margin-top="0pt" fo:margin-bottom="0pt" fo:border="none"/>
      <style:text-properties/>
    </style:style>
    <style:style style:family="text" style:name="T1600">
      <style:text-properties fo:color="#1f1f1f" fo:font-family="Arial" style:font-family-asian="Arial" style:font-family-complex="Arial" fo:font-size="12pt"/>
    </style:style>
    <style:style style:parent-style-name="1010" style:list-style-name="WWNum60" style:family="paragraph" style:name="P913">
      <style:paragraph-properties fo:line-height="115%" fo:margin-right="0cm" fo:margin-top="0pt" fo:margin-bottom="0pt" fo:border="none"/>
      <style:text-properties/>
    </style:style>
    <style:style style:family="text" style:name="T1601">
      <style:text-properties fo:color="#1f1f1f" fo:font-family="Arial" style:font-family-asian="Arial" style:font-family-complex="Arial" fo:font-size="12pt"/>
    </style:style>
    <style:style style:parent-style-name="1010" style:list-style-name="WWNum60" style:family="paragraph" style:name="P914">
      <style:paragraph-properties fo:line-height="115%" fo:margin-right="0cm" fo:margin-top="0pt" fo:margin-bottom="0pt" fo:border="none"/>
      <style:text-properties/>
    </style:style>
    <style:style style:family="text" style:name="T1602">
      <style:text-properties fo:color="#1f1f1f" fo:font-family="Arial" style:font-family-asian="Arial" style:font-family-complex="Arial" fo:font-size="12pt"/>
    </style:style>
    <style:style style:parent-style-name="1010" style:list-style-name="WWNum60" style:family="paragraph" style:name="P915">
      <style:paragraph-properties fo:line-height="115%" fo:margin-right="0cm" fo:margin-top="0pt" fo:margin-bottom="0pt" fo:border="none"/>
      <style:text-properties/>
    </style:style>
    <style:style style:family="text" style:name="T1603">
      <style:text-properties fo:color="#1f1f1f" fo:font-family="Arial" style:font-family-asian="Arial" style:font-family-complex="Arial" fo:font-size="12pt"/>
    </style:style>
    <style:style style:family="paragraph" style:name="P916">
      <style:paragraph-properties/>
      <style:text-properties/>
    </style:style>
    <style:style style:family="paragraph" style:name="P91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04">
      <style:text-properties fo:color="#1f1f1f" fo:font-family="Arial" style:font-family-asian="Arial" style:font-family-complex="Arial" fo:font-size="12pt"/>
    </style:style>
    <style:style style:parent-style-name="949" style:family="paragraph" style:name="P91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05">
      <style:text-properties fo:color="#1f1f1f" fo:font-family="Arial" style:font-family-asian="Arial" style:font-family-complex="Arial" fo:font-size="14pt" fo:font-weight="bold"/>
    </style:style>
    <style:style style:family="paragraph" style:name="P9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06">
      <style:text-properties fo:color="#1f1f1f" fo:font-family="Arial" style:font-family-asian="Arial" style:font-family-complex="Arial" fo:font-size="12pt"/>
    </style:style>
    <style:style style:parent-style-name="950" style:family="paragraph" style:name="P92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07">
      <style:text-properties fo:color="#1f1f1f" fo:font-family="Arial" style:font-family-asian="Arial" style:font-family-complex="Arial" fo:font-size="12pt" fo:font-weight="bold"/>
    </style:style>
    <style:style style:family="paragraph" style:name="P9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08">
      <style:text-properties fo:color="#1f1f1f" fo:font-family="Arial" style:font-family-asian="Arial" style:font-family-complex="Arial" fo:font-size="12pt"/>
    </style:style>
    <style:style style:parent-style-name="950" style:family="paragraph" style:name="P92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09">
      <style:text-properties fo:color="#1f1f1f" fo:font-family="Arial" style:font-family-asian="Arial" style:font-family-complex="Arial" fo:font-size="12pt" fo:font-weight="bold"/>
    </style:style>
    <style:style style:family="paragraph" style:name="P92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10">
      <style:text-properties fo:color="#1f1f1f" fo:font-family="Arial" style:font-family-asian="Arial" style:font-family-complex="Arial" fo:font-size="12pt"/>
    </style:style>
    <style:style style:parent-style-name="950" style:family="paragraph" style:name="P92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11">
      <style:text-properties fo:color="#1f1f1f" fo:font-family="Arial" style:font-family-asian="Arial" style:font-family-complex="Arial" fo:font-size="12pt" fo:font-weight="bold"/>
    </style:style>
    <style:style style:family="paragraph" style:name="P92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12">
      <style:text-properties fo:color="#1f1f1f" fo:font-family="Arial" style:font-family-asian="Arial" style:font-family-complex="Arial" fo:font-size="12pt"/>
    </style:style>
    <style:style style:parent-style-name="950" style:family="paragraph" style:name="P92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13">
      <style:text-properties fo:color="#1f1f1f" fo:font-family="Arial" style:font-family-asian="Arial" style:font-family-complex="Arial" fo:font-size="12pt" fo:font-weight="bold"/>
    </style:style>
    <style:style style:family="paragraph" style:name="P92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14">
      <style:text-properties fo:color="#1f1f1f" fo:font-family="Arial" style:font-family-asian="Arial" style:font-family-complex="Arial" fo:font-size="12pt"/>
    </style:style>
    <style:style style:parent-style-name="949" style:family="paragraph" style:name="P92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15">
      <style:text-properties fo:color="#1f1f1f" fo:font-family="Arial" style:font-family-asian="Arial" style:font-family-complex="Arial" fo:font-size="14pt" fo:font-weight="bold"/>
    </style:style>
    <style:style style:parent-style-name="1010" style:list-style-name="WWNum61" style:family="paragraph" style:name="P929">
      <style:paragraph-properties fo:line-height="115%" fo:margin-right="0cm" fo:margin-top="0pt" fo:margin-bottom="0pt" fo:border="none"/>
      <style:text-properties fo:font-family="Arial" style:font-family-asian="Arial" style:font-family-complex="Arial" fo:font-size="12pt"/>
    </style:style>
    <style:style style:family="text" style:name="T1616">
      <style:text-properties fo:color="#1f1f1f" fo:font-family="Arial" style:font-family-asian="Arial" style:font-family-complex="Arial" fo:font-size="12pt"/>
    </style:style>
    <style:style style:parent-style-name="1010" style:list-style-name="WWNum61" style:family="paragraph" style:name="P930">
      <style:paragraph-properties fo:line-height="115%" fo:margin-right="0cm" fo:margin-top="0pt" fo:margin-bottom="0pt" fo:border="none"/>
      <style:text-properties fo:font-family="Arial" style:font-family-asian="Arial" style:font-family-complex="Arial" fo:font-size="12pt"/>
    </style:style>
    <style:style style:family="text" style:name="T1617">
      <style:text-properties fo:color="#1f1f1f" fo:font-family="Arial" style:font-family-asian="Arial" style:font-family-complex="Arial" fo:font-size="12pt"/>
    </style:style>
    <style:style style:parent-style-name="1010" style:list-style-name="WWNum61" style:family="paragraph" style:name="P931">
      <style:paragraph-properties fo:line-height="115%" fo:margin-right="0cm" fo:margin-top="0pt" fo:margin-bottom="0pt" fo:border="none"/>
      <style:text-properties fo:font-family="Arial" style:font-family-asian="Arial" style:font-family-complex="Arial" fo:font-size="12pt"/>
    </style:style>
    <style:style style:family="text" style:name="T1618">
      <style:text-properties fo:color="#1f1f1f" fo:font-family="Arial" style:font-family-asian="Arial" style:font-family-complex="Arial" fo:font-size="12pt"/>
    </style:style>
    <style:style style:parent-style-name="1010" style:list-style-name="WWNum61" style:family="paragraph" style:name="P932">
      <style:paragraph-properties fo:line-height="115%" fo:margin-right="0cm" fo:margin-top="0pt" fo:margin-bottom="0pt" fo:border="none"/>
      <style:text-properties fo:font-family="Arial" style:font-family-asian="Arial" style:font-family-complex="Arial" fo:font-size="12pt"/>
    </style:style>
    <style:style style:family="text" style:name="T1619">
      <style:text-properties fo:color="#1f1f1f" fo:font-family="Arial" style:font-family-asian="Arial" style:font-family-complex="Arial" fo:font-size="12pt"/>
    </style:style>
    <style:style style:family="paragraph" style:name="P933">
      <style:paragraph-properties/>
      <style:text-properties/>
    </style:style>
    <style:style style:parent-style-name="949" style:family="paragraph" style:name="P93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620">
      <style:text-properties fo:color="#1f1f1f" fo:font-family="Arial" style:font-family-asian="Arial" style:font-family-complex="Arial" fo:font-size="14pt" fo:font-weight="bold"/>
    </style:style>
    <style:style style:family="paragraph" style:name="P93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1">
      <style:text-properties fo:color="#1f1f1f" fo:font-family="Arial" style:font-family-asian="Arial" style:font-family-complex="Arial" fo:font-size="12pt"/>
    </style:style>
    <style:style style:parent-style-name="950" style:family="paragraph" style:name="P93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2">
      <style:text-properties fo:color="#1f1f1f" fo:font-family="Arial" style:font-family-asian="Arial" style:font-family-complex="Arial" fo:font-size="12pt" fo:font-weight="bold"/>
    </style:style>
    <style:style style:family="paragraph" style:name="P93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3">
      <style:text-properties fo:color="#1f1f1f" fo:font-family="Arial" style:font-family-asian="Arial" style:font-family-complex="Arial" fo:font-size="12pt"/>
    </style:style>
    <style:style style:parent-style-name="950" style:family="paragraph" style:name="P93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4">
      <style:text-properties fo:color="#1f1f1f" fo:font-family="Arial" style:font-family-asian="Arial" style:font-family-complex="Arial" fo:font-size="12pt" fo:font-weight="bold"/>
    </style:style>
    <style:style style:family="paragraph" style:name="P93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5">
      <style:text-properties fo:color="#1f1f1f" fo:font-family="Arial" style:font-family-asian="Arial" style:font-family-complex="Arial" fo:font-size="12pt"/>
    </style:style>
    <style:style style:parent-style-name="950" style:family="paragraph" style:name="P94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6">
      <style:text-properties fo:color="#1f1f1f" fo:font-family="Arial" style:font-family-asian="Arial" style:font-family-complex="Arial" fo:font-size="12pt" fo:font-weight="bold"/>
    </style:style>
    <style:style style:family="paragraph" style:name="P94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7">
      <style:text-properties fo:color="#1f1f1f" fo:font-family="Arial" style:font-family-asian="Arial" style:font-family-complex="Arial" fo:font-size="12pt"/>
    </style:style>
    <style:style style:parent-style-name="950" style:family="paragraph" style:name="P94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28">
      <style:text-properties fo:color="#1f1f1f" fo:font-family="Arial" style:font-family-asian="Arial" style:font-family-complex="Arial" fo:font-size="12pt" fo:font-weight="bold"/>
    </style:style>
    <style:style style:family="paragraph" style:name="P94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29">
      <style:text-properties fo:color="#1f1f1f" fo:font-family="Arial" style:font-family-asian="Arial" style:font-family-complex="Arial" fo:font-size="12pt"/>
    </style:style>
    <style:style style:parent-style-name="949" style:family="paragraph" style:name="P94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30">
      <style:text-properties fo:color="#1f1f1f" fo:font-family="Arial" style:font-family-asian="Arial" style:font-family-complex="Arial" fo:font-size="14pt" fo:font-weight="bold"/>
    </style:style>
    <style:style style:parent-style-name="1010" style:list-style-name="WWNum62" style:family="paragraph" style:name="P945">
      <style:paragraph-properties fo:line-height="115%" fo:margin-right="0cm" fo:margin-top="0pt" fo:margin-bottom="0pt" fo:border="none"/>
      <style:text-properties fo:font-family="Arial" style:font-family-asian="Arial" style:font-family-complex="Arial" fo:font-size="12pt"/>
    </style:style>
    <style:style style:family="text" style:name="T1631">
      <style:text-properties fo:color="#1f1f1f" fo:font-family="Arial" style:font-family-asian="Arial" style:font-family-complex="Arial" fo:font-size="12pt"/>
    </style:style>
    <style:style style:parent-style-name="1010" style:list-style-name="WWNum62" style:family="paragraph" style:name="P946">
      <style:paragraph-properties fo:line-height="115%" fo:margin-right="0cm" fo:margin-top="0pt" fo:margin-bottom="0pt" fo:border="none"/>
      <style:text-properties fo:font-family="Arial" style:font-family-asian="Arial" style:font-family-complex="Arial" fo:font-size="12pt"/>
    </style:style>
    <style:style style:family="text" style:name="T1632">
      <style:text-properties fo:color="#1f1f1f" fo:font-family="Arial" style:font-family-asian="Arial" style:font-family-complex="Arial" fo:font-size="12pt"/>
    </style:style>
    <style:style style:parent-style-name="1010" style:list-style-name="WWNum62" style:family="paragraph" style:name="P947">
      <style:paragraph-properties fo:line-height="115%" fo:margin-right="0cm" fo:margin-top="0pt" fo:margin-bottom="0pt" fo:border="none"/>
      <style:text-properties fo:font-family="Arial" style:font-family-asian="Arial" style:font-family-complex="Arial" fo:font-size="12pt"/>
    </style:style>
    <style:style style:family="text" style:name="T1633">
      <style:text-properties fo:color="#1f1f1f" fo:font-family="Arial" style:font-family-asian="Arial" style:font-family-complex="Arial" fo:font-size="12pt"/>
    </style:style>
    <style:style style:parent-style-name="1010" style:list-style-name="WWNum62" style:family="paragraph" style:name="P948">
      <style:paragraph-properties fo:line-height="115%" fo:margin-right="0cm" fo:margin-top="0pt" fo:margin-bottom="0pt" fo:border="none"/>
      <style:text-properties fo:font-family="Arial" style:font-family-asian="Arial" style:font-family-complex="Arial" fo:font-size="12pt"/>
    </style:style>
    <style:style style:family="text" style:name="T1634">
      <style:text-properties fo:color="#1f1f1f" fo:font-family="Arial" style:font-family-asian="Arial" style:font-family-complex="Arial" fo:font-size="12pt"/>
    </style:style>
    <style:style style:family="paragraph" style:name="P949">
      <style:paragraph-properties/>
      <style:text-properties/>
    </style:style>
    <style:style style:parent-style-name="949" style:family="paragraph" style:name="P95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635">
      <style:text-properties fo:color="#1f1f1f" fo:font-family="Arial" style:font-family-asian="Arial" style:font-family-complex="Arial" fo:font-size="14pt" fo:font-weight="bold"/>
    </style:style>
    <style:style style:family="paragraph" style:name="P95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36">
      <style:text-properties fo:color="#1f1f1f" fo:font-family="Arial" style:font-family-asian="Arial" style:font-family-complex="Arial" fo:font-size="12pt"/>
    </style:style>
    <style:style style:parent-style-name="950" style:family="paragraph" style:name="P95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37">
      <style:text-properties fo:color="#1f1f1f" fo:font-family="Arial" style:font-family-asian="Arial" style:font-family-complex="Arial" fo:font-size="12pt" fo:font-weight="bold"/>
    </style:style>
    <style:style style:family="paragraph" style:name="P95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38">
      <style:text-properties fo:color="#1f1f1f" fo:font-family="Arial" style:font-family-asian="Arial" style:font-family-complex="Arial" fo:font-size="12pt"/>
    </style:style>
    <style:style style:parent-style-name="950" style:family="paragraph" style:name="P95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39">
      <style:text-properties fo:color="#1f1f1f" fo:font-family="Arial" style:font-family-asian="Arial" style:font-family-complex="Arial" fo:font-size="12pt" fo:font-weight="bold"/>
    </style:style>
    <style:style style:family="paragraph" style:name="P95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40">
      <style:text-properties fo:color="#1f1f1f" fo:font-family="Arial" style:font-family-asian="Arial" style:font-family-complex="Arial" fo:font-size="12pt"/>
    </style:style>
    <style:style style:parent-style-name="950" style:family="paragraph" style:name="P95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41">
      <style:text-properties fo:color="#1f1f1f" fo:font-family="Arial" style:font-family-asian="Arial" style:font-family-complex="Arial" fo:font-size="12pt" fo:font-weight="bold"/>
    </style:style>
    <style:style style:family="paragraph" style:name="P95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42">
      <style:text-properties fo:color="#1f1f1f" fo:font-family="Arial" style:font-family-asian="Arial" style:font-family-complex="Arial" fo:font-size="12pt"/>
    </style:style>
    <style:style style:parent-style-name="950" style:family="paragraph" style:name="P95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43">
      <style:text-properties fo:color="#1f1f1f" fo:font-family="Arial" style:font-family-asian="Arial" style:font-family-complex="Arial" fo:font-size="12pt" fo:font-weight="bold"/>
    </style:style>
    <style:style style:family="paragraph" style:name="P95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44">
      <style:text-properties fo:color="#1f1f1f" fo:font-family="Arial" style:font-family-asian="Arial" style:font-family-complex="Arial" fo:font-size="12pt"/>
    </style:style>
    <style:style style:parent-style-name="949" style:family="paragraph" style:name="P96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45">
      <style:text-properties fo:color="#1f1f1f" fo:font-family="Arial" style:font-family-asian="Arial" style:font-family-complex="Arial" fo:font-size="14pt" fo:font-weight="bold"/>
    </style:style>
    <style:style style:parent-style-name="1010" style:list-style-name="WWNum63" style:family="paragraph" style:name="P961">
      <style:paragraph-properties fo:line-height="115%" fo:margin-right="0cm" fo:margin-top="0pt" fo:margin-bottom="0pt" fo:border="none"/>
      <style:text-properties fo:font-family="Arial" style:font-family-asian="Arial" style:font-family-complex="Arial" fo:font-size="12pt"/>
    </style:style>
    <style:style style:family="text" style:name="T1646">
      <style:text-properties fo:color="#1f1f1f" fo:font-family="Arial" style:font-family-asian="Arial" style:font-family-complex="Arial" fo:font-size="12pt"/>
    </style:style>
    <style:style style:parent-style-name="1010" style:list-style-name="WWNum63" style:family="paragraph" style:name="P962">
      <style:paragraph-properties fo:line-height="115%" fo:margin-right="0cm" fo:margin-top="0pt" fo:margin-bottom="0pt" fo:border="none"/>
      <style:text-properties fo:font-family="Arial" style:font-family-asian="Arial" style:font-family-complex="Arial" fo:font-size="12pt"/>
    </style:style>
    <style:style style:family="text" style:name="T1647">
      <style:text-properties fo:color="#1f1f1f" fo:font-family="Arial" style:font-family-asian="Arial" style:font-family-complex="Arial" fo:font-size="12pt"/>
    </style:style>
    <style:style style:parent-style-name="1010" style:list-style-name="WWNum63" style:family="paragraph" style:name="P963">
      <style:paragraph-properties fo:line-height="115%" fo:margin-right="0cm" fo:margin-top="0pt" fo:margin-bottom="0pt" fo:border="none"/>
      <style:text-properties fo:font-family="Arial" style:font-family-asian="Arial" style:font-family-complex="Arial" fo:font-size="12pt"/>
    </style:style>
    <style:style style:family="text" style:name="T1648">
      <style:text-properties fo:color="#1f1f1f" fo:font-family="Arial" style:font-family-asian="Arial" style:font-family-complex="Arial" fo:font-size="12pt"/>
    </style:style>
    <style:style style:parent-style-name="1010" style:list-style-name="WWNum63" style:family="paragraph" style:name="P964">
      <style:paragraph-properties fo:line-height="115%" fo:margin-right="0cm" fo:margin-top="0pt" fo:margin-bottom="0pt" fo:border="none"/>
      <style:text-properties fo:font-family="Arial" style:font-family-asian="Arial" style:font-family-complex="Arial" fo:font-size="12pt"/>
    </style:style>
    <style:style style:family="text" style:name="T1649">
      <style:text-properties fo:color="#1f1f1f" fo:font-family="Arial" style:font-family-asian="Arial" style:font-family-complex="Arial" fo:font-size="12pt"/>
    </style:style>
    <style:style style:family="paragraph" style:name="P965">
      <style:paragraph-properties/>
      <style:text-properties/>
    </style:style>
    <style:style style:parent-style-name="949" style:family="paragraph" style:name="P966">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650">
      <style:text-properties fo:color="#1f1f1f" fo:font-family="Arial" style:font-family-asian="Arial" style:font-family-complex="Arial" fo:font-size="14pt" fo:font-weight="bold"/>
    </style:style>
    <style:style style:family="paragraph" style:name="P96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1">
      <style:text-properties fo:color="#1f1f1f" fo:font-family="Arial" style:font-family-asian="Arial" style:font-family-complex="Arial" fo:font-size="12pt"/>
    </style:style>
    <style:style style:family="paragraph" style:name="P96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2">
      <style:text-properties fo:color="#1f1f1f" fo:font-family="Arial" style:font-family-asian="Arial" style:font-family-complex="Arial" fo:font-size="12pt"/>
    </style:style>
    <style:style style:family="paragraph" style:name="P96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3">
      <style:text-properties fo:color="#1f1f1f" fo:font-family="Arial" style:font-family-asian="Arial" style:font-family-complex="Arial" fo:font-size="12pt"/>
    </style:style>
    <style:style style:family="paragraph" style:name="P97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4">
      <style:text-properties fo:color="#1f1f1f" fo:font-family="Arial" style:font-family-asian="Arial" style:font-family-complex="Arial" fo:font-size="12pt"/>
    </style:style>
    <style:style style:family="paragraph" style:name="P9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5">
      <style:text-properties fo:color="#1f1f1f" fo:font-family="Arial" style:font-family-asian="Arial" style:font-family-complex="Arial" fo:font-size="12pt"/>
    </style:style>
    <style:style style:family="paragraph" style:name="P97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6">
      <style:text-properties fo:color="#1f1f1f" fo:font-family="Arial" style:font-family-asian="Arial" style:font-family-complex="Arial" fo:font-size="12pt"/>
    </style:style>
    <style:style style:family="paragraph" style:name="P97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7">
      <style:text-properties fo:color="#1f1f1f" fo:font-family="Arial" style:font-family-asian="Arial" style:font-family-complex="Arial" fo:font-size="12pt"/>
    </style:style>
    <style:style style:family="paragraph" style:name="P97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8">
      <style:text-properties fo:color="#1f1f1f" fo:font-family="Arial" style:font-family-asian="Arial" style:font-family-complex="Arial" fo:font-size="12pt"/>
    </style:style>
    <style:style style:family="paragraph" style:name="P97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59">
      <style:text-properties fo:color="#1f1f1f" fo:font-family="Arial" style:font-family-asian="Arial" style:font-family-complex="Arial" fo:font-size="12pt"/>
    </style:style>
    <style:style style:parent-style-name="949" style:family="paragraph" style:name="P97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60">
      <style:text-properties fo:color="#1f1f1f" fo:font-family="Arial" style:font-family-asian="Arial" style:font-family-complex="Arial" fo:font-size="14pt" fo:font-weight="bold"/>
    </style:style>
    <style:style style:parent-style-name="1010" style:list-style-name="WWNum64" style:family="paragraph" style:name="P977">
      <style:paragraph-properties fo:line-height="115%" fo:margin-right="0cm" fo:margin-top="0pt" fo:margin-bottom="0pt" fo:border="none"/>
      <style:text-properties fo:font-family="Arial" style:font-family-asian="Arial" style:font-family-complex="Arial" fo:font-size="12pt"/>
    </style:style>
    <style:style style:family="text" style:name="T1661">
      <style:text-properties fo:color="#1f1f1f" fo:font-family="Arial" style:font-family-asian="Arial" style:font-family-complex="Arial" fo:font-size="12pt"/>
    </style:style>
    <style:style style:parent-style-name="1010" style:list-style-name="WWNum64" style:family="paragraph" style:name="P978">
      <style:paragraph-properties fo:line-height="115%" fo:margin-right="0cm" fo:margin-top="0pt" fo:margin-bottom="0pt" fo:border="none"/>
      <style:text-properties fo:font-family="Arial" style:font-family-asian="Arial" style:font-family-complex="Arial" fo:font-size="12pt"/>
    </style:style>
    <style:style style:family="text" style:name="T1662">
      <style:text-properties fo:color="#1f1f1f" fo:font-family="Arial" style:font-family-asian="Arial" style:font-family-complex="Arial" fo:font-size="12pt"/>
    </style:style>
    <style:style style:parent-style-name="1010" style:list-style-name="WWNum64" style:family="paragraph" style:name="P979">
      <style:paragraph-properties fo:line-height="115%" fo:margin-right="0cm" fo:margin-top="0pt" fo:margin-bottom="0pt" fo:border="none"/>
      <style:text-properties fo:font-family="Arial" style:font-family-asian="Arial" style:font-family-complex="Arial" fo:font-size="12pt"/>
    </style:style>
    <style:style style:family="text" style:name="T1663">
      <style:text-properties fo:color="#1f1f1f" fo:font-family="Arial" style:font-family-asian="Arial" style:font-family-complex="Arial" fo:font-size="12pt"/>
    </style:style>
    <style:style style:parent-style-name="1010" style:list-style-name="WWNum64" style:family="paragraph" style:name="P980">
      <style:paragraph-properties fo:line-height="115%" fo:margin-right="0cm" fo:margin-top="0pt" fo:margin-bottom="0pt" fo:border="none"/>
      <style:text-properties fo:font-family="Arial" style:font-family-asian="Arial" style:font-family-complex="Arial" fo:font-size="12pt"/>
    </style:style>
    <style:style style:family="text" style:name="T1664">
      <style:text-properties fo:color="#1f1f1f" fo:font-family="Arial" style:font-family-asian="Arial" style:font-family-complex="Arial" fo:font-size="12pt"/>
    </style:style>
    <style:style style:family="paragraph" style:name="P981">
      <style:paragraph-properties/>
      <style:text-properties/>
    </style:style>
    <style:style style:family="paragraph" style:name="P982">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65">
      <style:text-properties fo:color="#1f1f1f" fo:font-family="Arial" style:font-family-asian="Arial" style:font-family-complex="Arial" fo:font-size="12pt"/>
    </style:style>
    <style:style style:parent-style-name="949" style:family="paragraph" style:name="P98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66">
      <style:text-properties fo:color="#1f1f1f" fo:font-family="Arial" style:font-family-asian="Arial" style:font-family-complex="Arial" fo:font-size="14pt" fo:font-weight="bold"/>
    </style:style>
    <style:style style:family="paragraph" style:name="P98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67">
      <style:text-properties fo:color="#1f1f1f" fo:font-family="Arial" style:font-family-asian="Arial" style:font-family-complex="Arial" fo:font-size="12pt"/>
    </style:style>
    <style:style style:parent-style-name="950" style:family="paragraph" style:name="P98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68">
      <style:text-properties fo:color="#1f1f1f" fo:font-family="Arial" style:font-family-asian="Arial" style:font-family-complex="Arial" fo:font-size="12pt" fo:font-weight="bold"/>
    </style:style>
    <style:style style:family="paragraph" style:name="P98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69">
      <style:text-properties fo:color="#1f1f1f" fo:font-family="Arial" style:font-family-asian="Arial" style:font-family-complex="Arial" fo:font-size="12pt"/>
    </style:style>
    <style:style style:parent-style-name="950" style:family="paragraph" style:name="P98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0">
      <style:text-properties fo:color="#1f1f1f" fo:font-family="Arial" style:font-family-asian="Arial" style:font-family-complex="Arial" fo:font-size="12pt" fo:font-weight="bold"/>
    </style:style>
    <style:style style:family="paragraph" style:name="P98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1">
      <style:text-properties fo:color="#1f1f1f" fo:font-family="Arial" style:font-family-asian="Arial" style:font-family-complex="Arial" fo:font-size="12pt"/>
    </style:style>
    <style:style style:parent-style-name="1010" style:list-style-name="WWNum65" style:family="paragraph" style:name="P989">
      <style:paragraph-properties fo:line-height="115%" fo:margin-right="0cm" fo:margin-top="0pt" fo:margin-bottom="0pt" fo:border="none"/>
      <style:text-properties fo:font-family="Arial" style:font-family-asian="Arial" style:font-family-complex="Arial" fo:font-size="12pt"/>
    </style:style>
    <style:style style:family="text" style:name="T1672">
      <style:text-properties fo:color="#1f1f1f" fo:font-family="Arial" style:font-family-asian="Arial" style:font-family-complex="Arial" fo:font-size="12pt"/>
    </style:style>
    <style:style style:parent-style-name="1010" style:list-style-name="WWNum65" style:family="paragraph" style:name="P990">
      <style:paragraph-properties fo:line-height="115%" fo:margin-right="0cm" fo:margin-top="0pt" fo:margin-bottom="0pt" fo:border="none"/>
      <style:text-properties fo:font-family="Arial" style:font-family-asian="Arial" style:font-family-complex="Arial" fo:font-size="12pt"/>
    </style:style>
    <style:style style:family="text" style:name="T1673">
      <style:text-properties fo:color="#1f1f1f" fo:font-family="Arial" style:font-family-asian="Arial" style:font-family-complex="Arial" fo:font-size="12pt"/>
    </style:style>
    <style:style style:parent-style-name="1010" style:list-style-name="WWNum65" style:family="paragraph" style:name="P991">
      <style:paragraph-properties fo:line-height="115%" fo:margin-right="0cm" fo:margin-top="0pt" fo:margin-bottom="0pt" fo:border="none"/>
      <style:text-properties fo:font-family="Arial" style:font-family-asian="Arial" style:font-family-complex="Arial" fo:font-size="12pt"/>
    </style:style>
    <style:style style:family="text" style:name="T1674">
      <style:text-properties fo:color="#1f1f1f" fo:font-family="Arial" style:font-family-asian="Arial" style:font-family-complex="Arial" fo:font-size="12pt"/>
    </style:style>
    <style:style style:family="paragraph" style:name="P99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5">
      <style:text-properties fo:color="#1f1f1f" fo:font-family="Arial" style:font-family-asian="Arial" style:font-family-complex="Arial" fo:font-size="12pt"/>
    </style:style>
    <style:style style:parent-style-name="950" style:family="paragraph" style:name="P99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6">
      <style:text-properties fo:color="#1f1f1f" fo:font-family="Arial" style:font-family-asian="Arial" style:font-family-complex="Arial" fo:font-size="12pt" fo:font-weight="bold"/>
    </style:style>
    <style:style style:family="paragraph" style:name="P99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7">
      <style:text-properties fo:color="#1f1f1f" fo:font-family="Arial" style:font-family-asian="Arial" style:font-family-complex="Arial" fo:font-size="12pt"/>
    </style:style>
    <style:style style:parent-style-name="950" style:family="paragraph" style:name="P99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78">
      <style:text-properties fo:color="#1f1f1f" fo:font-family="Arial" style:font-family-asian="Arial" style:font-family-complex="Arial" fo:font-size="12pt" fo:font-weight="bold"/>
    </style:style>
    <style:style style:family="paragraph" style:name="P99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79">
      <style:text-properties fo:color="#1f1f1f" fo:font-family="Arial" style:font-family-asian="Arial" style:font-family-complex="Arial" fo:font-size="12pt"/>
    </style:style>
    <style:style style:family="table" style:name="ta7">
      <style:paragraph-properties fo:line-height="100%" fo:margin-bottom="0pt"/>
      <style:table-properties style:width="8.319cm" fo:margin-left="0cm" table:align="left" style:use-optimal-column-width="true"/>
    </style:style>
    <style:style style:family="table-column" style:name="co17">
      <style:table-column-properties style:column-width="1.545cm" style:use-optimal-column-width="true"/>
    </style:style>
    <style:style style:family="table-column" style:name="co18">
      <style:table-column-properties style:column-width="6.774cm" style:use-optimal-column-width="true"/>
    </style:style>
    <style:style style:family="table-row" style:name="ro21">
      <style:table-row-properties/>
    </style:style>
    <style:style style:family="table-cell" style:name="ce6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97">
      <style:paragraph-properties style:line-height-at-least="12pt" fo:margin-top="0pt" fo:margin-bottom="0pt"/>
      <style:text-properties/>
    </style:style>
    <style:style style:family="text" style:name="T1680">
      <style:text-properties fo:color="#1f1f1f" fo:font-family="Arial" style:font-family-asian="Arial" style:font-family-complex="Arial" fo:font-size="12pt" fo:font-weight="bold"/>
    </style:style>
    <style:style style:family="table-cell" style:name="ce6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98">
      <style:paragraph-properties style:line-height-at-least="12pt" fo:margin-top="0pt" fo:margin-bottom="0pt"/>
      <style:text-properties/>
    </style:style>
    <style:style style:family="text" style:name="T1681">
      <style:text-properties fo:color="#1f1f1f" fo:font-family="Arial" style:font-family-asian="Arial" style:font-family-complex="Arial" fo:font-size="12pt" fo:font-weight="bold"/>
    </style:style>
    <style:style style:family="table-row" style:name="ro22">
      <style:table-row-properties/>
    </style:style>
    <style:style style:family="table-cell" style:name="ce6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999">
      <style:paragraph-properties style:line-height-at-least="12pt" fo:margin-top="0pt" fo:margin-bottom="0pt"/>
      <style:text-properties/>
    </style:style>
    <style:style style:family="text" style:name="T1682">
      <style:text-properties fo:color="#1f1f1f" fo:font-family="Arial" style:font-family-asian="Arial" style:font-family-complex="Arial" fo:font-size="12pt"/>
    </style:style>
    <style:style style:family="table-cell" style:name="ce6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00">
      <style:paragraph-properties style:line-height-at-least="12pt" fo:margin-top="0pt" fo:margin-bottom="0pt"/>
      <style:text-properties/>
    </style:style>
    <style:style style:family="text" style:name="T1683">
      <style:text-properties fo:color="#1f1f1f" fo:font-family="Arial" style:font-family-asian="Arial" style:font-family-complex="Arial" fo:font-size="12pt"/>
    </style:style>
    <style:style style:family="table-row" style:name="ro23">
      <style:table-row-properties/>
    </style:style>
    <style:style style:family="table-cell" style:name="ce6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01">
      <style:paragraph-properties style:line-height-at-least="12pt" fo:margin-top="0pt" fo:margin-bottom="0pt"/>
      <style:text-properties/>
    </style:style>
    <style:style style:family="text" style:name="T1684">
      <style:text-properties fo:color="#1f1f1f" fo:font-family="Arial" style:font-family-asian="Arial" style:font-family-complex="Arial" fo:font-size="12pt"/>
    </style:style>
    <style:style style:family="table-cell" style:name="ce6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02">
      <style:paragraph-properties style:line-height-at-least="12pt" fo:margin-top="0pt" fo:margin-bottom="0pt"/>
      <style:text-properties/>
    </style:style>
    <style:style style:family="text" style:name="T1685">
      <style:text-properties fo:color="#1f1f1f" fo:font-family="Arial" style:font-family-asian="Arial" style:font-family-complex="Arial" fo:font-size="12pt"/>
    </style:style>
    <style:style style:family="table-row" style:name="ro24">
      <style:table-row-properties/>
    </style:style>
    <style:style style:family="table-cell" style:name="ce6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03">
      <style:paragraph-properties style:line-height-at-least="12pt" fo:margin-top="0pt" fo:margin-bottom="0pt"/>
      <style:text-properties/>
    </style:style>
    <style:style style:family="text" style:name="T1686">
      <style:text-properties fo:color="#1f1f1f" fo:font-family="Arial" style:font-family-asian="Arial" style:font-family-complex="Arial" fo:font-size="12pt"/>
    </style:style>
    <style:style style:family="table-cell" style:name="ce6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004">
      <style:paragraph-properties style:line-height-at-least="12pt" fo:margin-top="0pt" fo:margin-bottom="0pt"/>
      <style:text-properties/>
    </style:style>
    <style:style style:family="text" style:name="T1687">
      <style:text-properties fo:color="#1f1f1f" fo:font-family="Arial" style:font-family-asian="Arial" style:font-family-complex="Arial" fo:font-size="12pt"/>
    </style:style>
    <style:style style:family="paragraph" style:name="P100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88">
      <style:text-properties fo:color="#1f1f1f" fo:font-family="Arial" style:font-family-asian="Arial" style:font-family-complex="Arial" fo:font-size="12pt"/>
    </style:style>
    <style:style style:parent-style-name="949" style:family="paragraph" style:name="P100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89">
      <style:text-properties fo:color="#1f1f1f" fo:font-family="Arial" style:font-family-asian="Arial" style:font-family-complex="Arial" fo:font-size="14pt" fo:font-weight="bold"/>
    </style:style>
    <style:style style:parent-style-name="1010" style:list-style-name="WWNum65" style:family="paragraph" style:name="P1007">
      <style:paragraph-properties fo:line-height="115%" fo:margin-right="0cm" fo:margin-top="0pt" fo:margin-bottom="0pt" fo:border="none"/>
      <style:text-properties fo:font-family="Arial" style:font-family-asian="Arial" style:font-family-complex="Arial" fo:font-size="12pt"/>
    </style:style>
    <style:style style:family="text" style:name="T1690">
      <style:text-properties fo:color="#1f1f1f" fo:font-family="Arial" style:font-family-asian="Arial" style:font-family-complex="Arial" fo:font-size="12pt"/>
    </style:style>
    <style:style style:parent-style-name="1010" style:list-style-name="WWNum65" style:family="paragraph" style:name="P1008">
      <style:paragraph-properties fo:line-height="115%" fo:margin-right="0cm" fo:margin-top="0pt" fo:margin-bottom="0pt" fo:border="none"/>
      <style:text-properties fo:font-family="Arial" style:font-family-asian="Arial" style:font-family-complex="Arial" fo:font-size="12pt"/>
    </style:style>
    <style:style style:family="text" style:name="T1691">
      <style:text-properties fo:color="#1f1f1f" fo:font-family="Arial" style:font-family-asian="Arial" style:font-family-complex="Arial" fo:font-size="12pt"/>
    </style:style>
    <style:style style:parent-style-name="1010" style:list-style-name="WWNum65" style:family="paragraph" style:name="P1009">
      <style:paragraph-properties fo:line-height="115%" fo:margin-right="0cm" fo:margin-top="0pt" fo:margin-bottom="0pt" fo:border="none"/>
      <style:text-properties fo:font-family="Arial" style:font-family-asian="Arial" style:font-family-complex="Arial" fo:font-size="12pt"/>
    </style:style>
    <style:style style:family="text" style:name="T1692">
      <style:text-properties fo:color="#1f1f1f" fo:font-family="Arial" style:font-family-asian="Arial" style:font-family-complex="Arial" fo:font-size="12pt"/>
    </style:style>
    <style:style style:parent-style-name="1010" style:list-style-name="WWNum65" style:family="paragraph" style:name="P1010">
      <style:paragraph-properties fo:line-height="115%" fo:margin-right="0cm" fo:margin-top="0pt" fo:margin-bottom="0pt" fo:border="none"/>
      <style:text-properties fo:font-family="Arial" style:font-family-asian="Arial" style:font-family-complex="Arial" fo:font-size="12pt"/>
    </style:style>
    <style:style style:family="text" style:name="T1693">
      <style:text-properties fo:color="#1f1f1f" fo:font-family="Arial" style:font-family-asian="Arial" style:font-family-complex="Arial" fo:font-size="12pt"/>
    </style:style>
    <style:style style:family="paragraph" style:name="P1011">
      <style:paragraph-properties/>
      <style:text-properties/>
    </style:style>
    <style:style style:family="paragraph" style:name="P1012">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694">
      <style:text-properties fo:color="#1f1f1f" fo:font-family="Arial" style:font-family-asian="Arial" style:font-family-complex="Arial" fo:font-size="12pt"/>
    </style:style>
    <style:style style:parent-style-name="949" style:family="paragraph" style:name="P101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695">
      <style:text-properties fo:color="#1f1f1f" fo:font-family="Arial" style:font-family-asian="Arial" style:font-family-complex="Arial" fo:font-size="14pt" fo:font-weight="bold"/>
    </style:style>
    <style:style style:family="paragraph" style:name="P101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96">
      <style:text-properties fo:color="#1f1f1f" fo:font-family="Arial" style:font-family-asian="Arial" style:font-family-complex="Arial" fo:font-size="12pt"/>
    </style:style>
    <style:style style:parent-style-name="950" style:family="paragraph" style:name="P101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97">
      <style:text-properties fo:color="#1f1f1f" fo:font-family="Arial" style:font-family-asian="Arial" style:font-family-complex="Arial" fo:font-size="12pt" fo:font-weight="bold"/>
    </style:style>
    <style:style style:family="paragraph" style:name="P101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698">
      <style:text-properties fo:color="#1f1f1f" fo:font-family="Arial" style:font-family-asian="Arial" style:font-family-complex="Arial" fo:font-size="12pt"/>
    </style:style>
    <style:style style:parent-style-name="950" style:family="paragraph" style:name="P101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699">
      <style:text-properties fo:color="#1f1f1f" fo:font-family="Arial" style:font-family-asian="Arial" style:font-family-complex="Arial" fo:font-size="12pt" fo:font-weight="bold"/>
    </style:style>
    <style:style style:family="paragraph" style:name="P101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0">
      <style:text-properties fo:color="#1f1f1f" fo:font-family="Arial" style:font-family-asian="Arial" style:font-family-complex="Arial" fo:font-size="12pt"/>
    </style:style>
    <style:style style:parent-style-name="950" style:family="paragraph" style:name="P101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01">
      <style:text-properties fo:color="#1f1f1f" fo:font-family="Arial" style:font-family-asian="Arial" style:font-family-complex="Arial" fo:font-size="12pt" fo:font-weight="bold"/>
    </style:style>
    <style:style style:family="paragraph" style:name="P10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2">
      <style:text-properties fo:color="#1f1f1f" fo:font-family="Arial" style:font-family-asian="Arial" style:font-family-complex="Arial" fo:font-size="12pt"/>
    </style:style>
    <style:style style:parent-style-name="950" style:family="paragraph" style:name="P102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03">
      <style:text-properties fo:color="#1f1f1f" fo:font-family="Arial" style:font-family-asian="Arial" style:font-family-complex="Arial" fo:font-size="12pt" fo:font-weight="bold"/>
    </style:style>
    <style:style style:family="paragraph" style:name="P102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04">
      <style:text-properties fo:color="#1f1f1f" fo:font-family="Arial" style:font-family-asian="Arial" style:font-family-complex="Arial" fo:font-size="12pt"/>
    </style:style>
    <style:style style:parent-style-name="949" style:family="paragraph" style:name="P102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05">
      <style:text-properties fo:color="#1f1f1f" fo:font-family="Arial" style:font-family-asian="Arial" style:font-family-complex="Arial" fo:font-size="14pt" fo:font-weight="bold"/>
    </style:style>
    <style:style style:parent-style-name="1010" style:list-style-name="WWNum66" style:family="paragraph" style:name="P1024">
      <style:paragraph-properties fo:line-height="115%" fo:margin-right="0cm" fo:margin-top="0pt" fo:margin-bottom="0pt" fo:border="none"/>
      <style:text-properties fo:font-family="Arial" style:font-family-asian="Arial" style:font-family-complex="Arial" fo:font-size="12pt"/>
    </style:style>
    <style:style style:family="text" style:name="T1706">
      <style:text-properties fo:color="#1f1f1f" fo:font-family="Arial" style:font-family-asian="Arial" style:font-family-complex="Arial" fo:font-size="12pt"/>
    </style:style>
    <style:style style:parent-style-name="1010" style:list-style-name="WWNum66" style:family="paragraph" style:name="P1025">
      <style:paragraph-properties fo:line-height="115%" fo:margin-right="0cm" fo:margin-top="0pt" fo:margin-bottom="0pt" fo:border="none"/>
      <style:text-properties fo:font-family="Arial" style:font-family-asian="Arial" style:font-family-complex="Arial" fo:font-size="12pt"/>
    </style:style>
    <style:style style:family="text" style:name="T1707">
      <style:text-properties fo:color="#1f1f1f" fo:font-family="Arial" style:font-family-asian="Arial" style:font-family-complex="Arial" fo:font-size="12pt"/>
    </style:style>
    <style:style style:parent-style-name="1010" style:list-style-name="WWNum66" style:family="paragraph" style:name="P1026">
      <style:paragraph-properties fo:line-height="115%" fo:margin-right="0cm" fo:margin-top="0pt" fo:margin-bottom="0pt" fo:border="none"/>
      <style:text-properties fo:font-family="Arial" style:font-family-asian="Arial" style:font-family-complex="Arial" fo:font-size="12pt"/>
    </style:style>
    <style:style style:family="text" style:name="T1708">
      <style:text-properties fo:color="#1f1f1f" fo:font-family="Arial" style:font-family-asian="Arial" style:font-family-complex="Arial" fo:font-size="12pt"/>
    </style:style>
    <style:style style:parent-style-name="1010" style:list-style-name="WWNum66" style:family="paragraph" style:name="P1027">
      <style:paragraph-properties fo:line-height="115%" fo:margin-right="0cm" fo:margin-top="0pt" fo:margin-bottom="0pt" fo:border="none"/>
      <style:text-properties fo:font-family="Arial" style:font-family-asian="Arial" style:font-family-complex="Arial" fo:font-size="12pt"/>
    </style:style>
    <style:style style:family="text" style:name="T1709">
      <style:text-properties fo:color="#1f1f1f" fo:font-family="Arial" style:font-family-asian="Arial" style:font-family-complex="Arial" fo:font-size="12pt"/>
    </style:style>
    <style:style style:family="paragraph" style:name="P1028">
      <style:paragraph-properties/>
      <style:text-properties/>
    </style:style>
    <style:style style:parent-style-name="949" style:family="paragraph" style:name="P102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10">
      <style:text-properties fo:color="#1f1f1f" fo:font-family="Arial" style:font-family-asian="Arial" style:font-family-complex="Arial" fo:font-size="14pt" fo:font-weight="bold"/>
    </style:style>
    <style:style style:family="paragraph" style:name="P103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1">
      <style:text-properties fo:color="#1f1f1f" fo:font-family="Arial" style:font-family-asian="Arial" style:font-family-complex="Arial" fo:font-size="12pt"/>
    </style:style>
    <style:style style:parent-style-name="950" style:family="paragraph" style:name="P103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12">
      <style:text-properties fo:color="#1f1f1f" fo:font-family="Arial" style:font-family-asian="Arial" style:font-family-complex="Arial" fo:font-size="12pt" fo:font-weight="bold"/>
    </style:style>
    <style:style style:family="paragraph" style:name="P103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3">
      <style:text-properties fo:color="#1f1f1f" fo:font-family="Arial" style:font-family-asian="Arial" style:font-family-complex="Arial" fo:font-size="12pt"/>
    </style:style>
    <style:style style:family="text" style:name="T1714">
      <style:text-properties fo:color="#1f1f1f" fo:font-family="Arial" style:font-family-asian="Arial" style:font-family-complex="Arial" fo:font-size="12pt"/>
    </style:style>
    <style:style style:parent-style-name="950" style:family="paragraph" style:name="P103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15">
      <style:text-properties fo:color="#1f1f1f" fo:font-family="Arial" style:font-family-asian="Arial" style:font-family-complex="Arial" fo:font-size="12pt" fo:font-weight="bold"/>
    </style:style>
    <style:style style:family="paragraph" style:name="P103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6">
      <style:text-properties fo:color="#1f1f1f" fo:font-family="Arial" style:font-family-asian="Arial" style:font-family-complex="Arial" fo:font-size="12pt"/>
    </style:style>
    <style:style style:family="text" style:name="T1717">
      <style:text-properties fo:color="#1f1f1f" fo:font-family="Arial" style:font-family-asian="Arial" style:font-family-complex="Arial" fo:font-size="12pt"/>
    </style:style>
    <style:style style:parent-style-name="950" style:family="paragraph" style:name="P103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18">
      <style:text-properties fo:color="#1f1f1f" fo:font-family="Arial" style:font-family-asian="Arial" style:font-family-complex="Arial" fo:font-size="12pt" fo:font-weight="bold"/>
    </style:style>
    <style:style style:family="paragraph" style:name="P10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19">
      <style:text-properties fo:color="#1f1f1f" fo:font-family="Arial" style:font-family-asian="Arial" style:font-family-complex="Arial" fo:font-size="12pt"/>
    </style:style>
    <style:style style:family="text" style:name="T1720">
      <style:text-properties fo:color="#1f1f1f" fo:font-family="Arial" style:font-family-asian="Arial" style:font-family-complex="Arial" fo:font-size="12pt"/>
    </style:style>
    <style:style style:parent-style-name="950" style:family="paragraph" style:name="P10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21">
      <style:text-properties fo:color="#1f1f1f" fo:font-family="Arial" style:font-family-asian="Arial" style:font-family-complex="Arial" fo:font-size="12pt" fo:font-weight="bold"/>
    </style:style>
    <style:style style:family="paragraph" style:name="P10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22">
      <style:text-properties fo:color="#1f1f1f" fo:font-family="Arial" style:font-family-asian="Arial" style:font-family-complex="Arial" fo:font-size="12pt"/>
    </style:style>
    <style:style style:parent-style-name="949" style:family="paragraph" style:name="P103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23">
      <style:text-properties fo:color="#1f1f1f" fo:font-family="Arial" style:font-family-asian="Arial" style:font-family-complex="Arial" fo:font-size="14pt" fo:font-weight="bold"/>
    </style:style>
    <style:style style:parent-style-name="1010" style:list-style-name="WWNum67" style:family="paragraph" style:name="P1040">
      <style:paragraph-properties fo:line-height="115%" fo:margin-right="0cm" fo:margin-top="0pt" fo:margin-bottom="0pt" fo:border="none"/>
      <style:text-properties fo:font-family="Arial" style:font-family-asian="Arial" style:font-family-complex="Arial" fo:font-size="12pt"/>
    </style:style>
    <style:style style:family="text" style:name="T1724">
      <style:text-properties fo:color="#1f1f1f" fo:font-family="Arial" style:font-family-asian="Arial" style:font-family-complex="Arial" fo:font-size="12pt"/>
    </style:style>
    <style:style style:parent-style-name="1010" style:list-style-name="WWNum67" style:family="paragraph" style:name="P1041">
      <style:paragraph-properties fo:line-height="115%" fo:margin-right="0cm" fo:margin-top="0pt" fo:margin-bottom="0pt" fo:border="none"/>
      <style:text-properties fo:font-family="Arial" style:font-family-asian="Arial" style:font-family-complex="Arial" fo:font-size="12pt"/>
    </style:style>
    <style:style style:family="text" style:name="T1725">
      <style:text-properties fo:color="#1f1f1f" fo:font-family="Arial" style:font-family-asian="Arial" style:font-family-complex="Arial" fo:font-size="12pt"/>
    </style:style>
    <style:style style:parent-style-name="1010" style:list-style-name="WWNum67" style:family="paragraph" style:name="P1042">
      <style:paragraph-properties fo:line-height="115%" fo:margin-right="0cm" fo:margin-top="0pt" fo:margin-bottom="0pt" fo:border="none"/>
      <style:text-properties fo:font-family="Arial" style:font-family-asian="Arial" style:font-family-complex="Arial" fo:font-size="12pt"/>
    </style:style>
    <style:style style:family="text" style:name="T1726">
      <style:text-properties fo:color="#1f1f1f" fo:font-family="Arial" style:font-family-asian="Arial" style:font-family-complex="Arial" fo:font-size="12pt"/>
    </style:style>
    <style:style style:parent-style-name="1010" style:list-style-name="WWNum67" style:family="paragraph" style:name="P1043">
      <style:paragraph-properties fo:line-height="115%" fo:margin-right="0cm" fo:margin-top="0pt" fo:margin-bottom="0pt" fo:border="none"/>
      <style:text-properties fo:font-family="Arial" style:font-family-asian="Arial" style:font-family-complex="Arial" fo:font-size="12pt"/>
    </style:style>
    <style:style style:family="text" style:name="T1727">
      <style:text-properties fo:color="#1f1f1f" fo:font-family="Arial" style:font-family-asian="Arial" style:font-family-complex="Arial" fo:font-size="12pt"/>
    </style:style>
    <style:style style:family="paragraph" style:name="P1044">
      <style:paragraph-properties/>
      <style:text-properties/>
    </style:style>
    <style:style style:family="paragraph" style:name="P1045">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728">
      <style:text-properties fo:color="#1f1f1f" fo:font-family="Arial" style:font-family-asian="Arial" style:font-family-complex="Arial" fo:font-size="12pt"/>
    </style:style>
    <style:style style:parent-style-name="949" style:family="paragraph" style:name="P104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29">
      <style:text-properties fo:color="#1f1f1f" fo:font-family="Arial" style:font-family-asian="Arial" style:font-family-complex="Arial" fo:font-size="14pt" fo:font-weight="bold"/>
    </style:style>
    <style:style style:family="paragraph" style:name="P104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0">
      <style:text-properties fo:color="#1f1f1f" fo:font-family="Arial" style:font-family-asian="Arial" style:font-family-complex="Arial" fo:font-size="12pt"/>
    </style:style>
    <style:style style:parent-style-name="950" style:family="paragraph" style:name="P104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1">
      <style:text-properties fo:color="#1f1f1f" fo:font-family="Arial" style:font-family-asian="Arial" style:font-family-complex="Arial" fo:font-size="12pt" fo:font-weight="bold"/>
    </style:style>
    <style:style style:family="paragraph" style:name="P104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2">
      <style:text-properties fo:color="#1f1f1f" fo:font-family="Arial" style:font-family-asian="Arial" style:font-family-complex="Arial" fo:font-size="12pt"/>
    </style:style>
    <style:style style:parent-style-name="950" style:family="paragraph" style:name="P105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3">
      <style:text-properties fo:color="#1f1f1f" fo:font-family="Arial" style:font-family-asian="Arial" style:font-family-complex="Arial" fo:font-size="12pt" fo:font-weight="bold"/>
    </style:style>
    <style:style style:family="paragraph" style:name="P105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4">
      <style:text-properties fo:color="#1f1f1f" fo:font-family="Arial" style:font-family-asian="Arial" style:font-family-complex="Arial" fo:font-size="12pt"/>
    </style:style>
    <style:style style:parent-style-name="950" style:family="paragraph" style:name="P105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5">
      <style:text-properties fo:color="#1f1f1f" fo:font-family="Arial" style:font-family-asian="Arial" style:font-family-complex="Arial" fo:font-size="12pt" fo:font-weight="bold"/>
    </style:style>
    <style:style style:family="paragraph" style:name="P105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6">
      <style:text-properties fo:color="#1f1f1f" fo:font-family="Arial" style:font-family-asian="Arial" style:font-family-complex="Arial" fo:font-size="12pt"/>
    </style:style>
    <style:style style:parent-style-name="950" style:family="paragraph" style:name="P105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37">
      <style:text-properties fo:color="#1f1f1f" fo:font-family="Arial" style:font-family-asian="Arial" style:font-family-complex="Arial" fo:font-size="12pt" fo:font-weight="bold"/>
    </style:style>
    <style:style style:family="paragraph" style:name="P105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38">
      <style:text-properties fo:color="#1f1f1f" fo:font-family="Arial" style:font-family-asian="Arial" style:font-family-complex="Arial" fo:font-size="12pt"/>
    </style:style>
    <style:style style:parent-style-name="949" style:family="paragraph" style:name="P105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39">
      <style:text-properties fo:color="#1f1f1f" fo:font-family="Arial" style:font-family-asian="Arial" style:font-family-complex="Arial" fo:font-size="14pt" fo:font-weight="bold"/>
    </style:style>
    <style:style style:parent-style-name="1010" style:list-style-name="WWNum68" style:family="paragraph" style:name="P1057">
      <style:paragraph-properties fo:line-height="115%" fo:margin-right="0cm" fo:margin-top="0pt" fo:margin-bottom="0pt" fo:border="none"/>
      <style:text-properties fo:font-family="Arial" style:font-family-asian="Arial" style:font-family-complex="Arial" fo:font-size="12pt"/>
    </style:style>
    <style:style style:family="text" style:name="T1740">
      <style:text-properties fo:color="#1f1f1f" fo:font-family="Arial" style:font-family-asian="Arial" style:font-family-complex="Arial" fo:font-size="12pt"/>
    </style:style>
    <style:style style:parent-style-name="1010" style:list-style-name="WWNum68" style:family="paragraph" style:name="P1058">
      <style:paragraph-properties fo:line-height="115%" fo:margin-right="0cm" fo:margin-top="0pt" fo:margin-bottom="0pt" fo:border="none"/>
      <style:text-properties fo:font-family="Arial" style:font-family-asian="Arial" style:font-family-complex="Arial" fo:font-size="12pt"/>
    </style:style>
    <style:style style:family="text" style:name="T1741">
      <style:text-properties fo:color="#1f1f1f" fo:font-family="Arial" style:font-family-asian="Arial" style:font-family-complex="Arial" fo:font-size="12pt"/>
    </style:style>
    <style:style style:parent-style-name="1010" style:list-style-name="WWNum68" style:family="paragraph" style:name="P1059">
      <style:paragraph-properties fo:line-height="115%" fo:margin-right="0cm" fo:margin-top="0pt" fo:margin-bottom="0pt" fo:border="none"/>
      <style:text-properties fo:font-family="Arial" style:font-family-asian="Arial" style:font-family-complex="Arial" fo:font-size="12pt"/>
    </style:style>
    <style:style style:family="text" style:name="T1742">
      <style:text-properties fo:color="#1f1f1f" fo:font-family="Arial" style:font-family-asian="Arial" style:font-family-complex="Arial" fo:font-size="12pt"/>
    </style:style>
    <style:style style:parent-style-name="1010" style:list-style-name="WWNum68" style:family="paragraph" style:name="P1060">
      <style:paragraph-properties fo:line-height="115%" fo:margin-right="0cm" fo:margin-top="0pt" fo:margin-bottom="0pt" fo:border="none"/>
      <style:text-properties fo:font-family="Arial" style:font-family-asian="Arial" style:font-family-complex="Arial" fo:font-size="12pt"/>
    </style:style>
    <style:style style:family="text" style:name="T1743">
      <style:text-properties fo:color="#1f1f1f" fo:font-family="Arial" style:font-family-asian="Arial" style:font-family-complex="Arial" fo:font-size="12pt"/>
    </style:style>
    <style:style style:family="paragraph" style:name="P1061">
      <style:paragraph-properties/>
      <style:text-properties/>
    </style:style>
    <style:style style:parent-style-name="949" style:family="paragraph" style:name="P106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44">
      <style:text-properties fo:color="#1f1f1f" fo:font-family="Arial" style:font-family-asian="Arial" style:font-family-complex="Arial" fo:font-size="14pt" fo:font-weight="bold"/>
    </style:style>
    <style:style style:family="paragraph" style:name="P106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45">
      <style:text-properties fo:color="#1f1f1f" fo:font-family="Arial" style:font-family-asian="Arial" style:font-family-complex="Arial" fo:font-size="12pt"/>
    </style:style>
    <style:style style:parent-style-name="950" style:family="paragraph" style:name="P106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46">
      <style:text-properties fo:color="#1f1f1f" fo:font-family="Arial" style:font-family-asian="Arial" style:font-family-complex="Arial" fo:font-size="12pt" fo:font-weight="bold"/>
    </style:style>
    <style:style style:family="paragraph" style:name="P106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47">
      <style:text-properties fo:color="#1f1f1f" fo:font-family="Arial" style:font-family-asian="Arial" style:font-family-complex="Arial" fo:font-size="12pt"/>
    </style:style>
    <style:style style:parent-style-name="950" style:family="paragraph" style:name="P106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48">
      <style:text-properties fo:color="#1f1f1f" fo:font-family="Arial" style:font-family-asian="Arial" style:font-family-complex="Arial" fo:font-size="12pt" fo:font-weight="bold"/>
    </style:style>
    <style:style style:family="paragraph" style:name="P106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49">
      <style:text-properties fo:color="#1f1f1f" fo:font-family="Arial" style:font-family-asian="Arial" style:font-family-complex="Arial" fo:font-size="12pt"/>
    </style:style>
    <style:style style:parent-style-name="950" style:family="paragraph" style:name="P106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50">
      <style:text-properties fo:color="#1f1f1f" fo:font-family="Arial" style:font-family-asian="Arial" style:font-family-complex="Arial" fo:font-size="12pt" fo:font-weight="bold"/>
    </style:style>
    <style:style style:family="paragraph" style:name="P106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51">
      <style:text-properties fo:color="#1f1f1f" fo:font-family="Arial" style:font-family-asian="Arial" style:font-family-complex="Arial" fo:font-size="12pt"/>
    </style:style>
    <style:style style:parent-style-name="950" style:family="paragraph" style:name="P107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52">
      <style:text-properties fo:color="#1f1f1f" fo:font-family="Arial" style:font-family-asian="Arial" style:font-family-complex="Arial" fo:font-size="12pt" fo:font-weight="bold"/>
    </style:style>
    <style:style style:family="paragraph" style:name="P107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53">
      <style:text-properties fo:color="#1f1f1f" fo:font-family="Arial" style:font-family-asian="Arial" style:font-family-complex="Arial" fo:font-size="12pt"/>
    </style:style>
    <style:style style:parent-style-name="949" style:family="paragraph" style:name="P107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54">
      <style:text-properties fo:color="#1f1f1f" fo:font-family="Arial" style:font-family-asian="Arial" style:font-family-complex="Arial" fo:font-size="14pt" fo:font-weight="bold"/>
    </style:style>
    <style:style style:parent-style-name="1010" style:list-style-name="WWNum69" style:family="paragraph" style:name="P1073">
      <style:paragraph-properties fo:line-height="115%" fo:margin-right="0cm" fo:margin-top="0pt" fo:margin-bottom="0pt" fo:border="none"/>
      <style:text-properties fo:font-family="Arial" style:font-family-asian="Arial" style:font-family-complex="Arial" fo:font-size="12pt"/>
    </style:style>
    <style:style style:family="text" style:name="T1755">
      <style:text-properties fo:color="#1f1f1f" fo:font-family="Arial" style:font-family-asian="Arial" style:font-family-complex="Arial" fo:font-size="12pt"/>
    </style:style>
    <style:style style:parent-style-name="1010" style:list-style-name="WWNum69" style:family="paragraph" style:name="P1074">
      <style:paragraph-properties fo:line-height="115%" fo:margin-right="0cm" fo:margin-top="0pt" fo:margin-bottom="0pt" fo:border="none"/>
      <style:text-properties fo:font-family="Arial" style:font-family-asian="Arial" style:font-family-complex="Arial" fo:font-size="12pt"/>
    </style:style>
    <style:style style:family="text" style:name="T1756">
      <style:text-properties fo:color="#1f1f1f" fo:font-family="Arial" style:font-family-asian="Arial" style:font-family-complex="Arial" fo:font-size="12pt"/>
    </style:style>
    <style:style style:parent-style-name="1010" style:list-style-name="WWNum69" style:family="paragraph" style:name="P1075">
      <style:paragraph-properties fo:line-height="115%" fo:margin-right="0cm" fo:margin-top="0pt" fo:margin-bottom="0pt" fo:border="none"/>
      <style:text-properties fo:font-family="Arial" style:font-family-asian="Arial" style:font-family-complex="Arial" fo:font-size="12pt"/>
    </style:style>
    <style:style style:family="text" style:name="T1757">
      <style:text-properties fo:color="#1f1f1f" fo:font-family="Arial" style:font-family-asian="Arial" style:font-family-complex="Arial" fo:font-size="12pt"/>
    </style:style>
    <style:style style:parent-style-name="1010" style:list-style-name="WWNum69" style:family="paragraph" style:name="P1076">
      <style:paragraph-properties fo:line-height="115%" fo:margin-right="0cm" fo:margin-top="0pt" fo:margin-bottom="0pt" fo:border="none"/>
      <style:text-properties fo:font-family="Arial" style:font-family-asian="Arial" style:font-family-complex="Arial" fo:font-size="12pt"/>
    </style:style>
    <style:style style:family="text" style:name="T1758">
      <style:text-properties fo:color="#1f1f1f" fo:font-family="Arial" style:font-family-asian="Arial" style:font-family-complex="Arial" fo:font-size="12pt"/>
    </style:style>
    <style:style style:family="paragraph" style:name="P1077">
      <style:paragraph-properties/>
      <style:text-properties/>
    </style:style>
    <style:style style:parent-style-name="949" style:family="paragraph" style:name="P107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59">
      <style:text-properties fo:color="#1f1f1f" fo:font-family="Arial" style:font-family-asian="Arial" style:font-family-complex="Arial" fo:font-size="14pt" fo:font-weight="bold"/>
    </style:style>
    <style:style style:family="paragraph" style:name="P107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0">
      <style:text-properties fo:color="#1f1f1f" fo:font-family="Arial" style:font-family-asian="Arial" style:font-family-complex="Arial" fo:font-size="12pt"/>
    </style:style>
    <style:style style:parent-style-name="950" style:family="paragraph" style:name="P108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1">
      <style:text-properties fo:color="#1f1f1f" fo:font-family="Arial" style:font-family-asian="Arial" style:font-family-complex="Arial" fo:font-size="12pt" fo:font-weight="bold"/>
    </style:style>
    <style:style style:family="paragraph" style:name="P108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2">
      <style:text-properties fo:color="#1f1f1f" fo:font-family="Arial" style:font-family-asian="Arial" style:font-family-complex="Arial" fo:font-size="12pt"/>
    </style:style>
    <style:style style:parent-style-name="950" style:family="paragraph" style:name="P108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3">
      <style:text-properties fo:color="#1f1f1f" fo:font-family="Arial" style:font-family-asian="Arial" style:font-family-complex="Arial" fo:font-size="12pt" fo:font-weight="bold"/>
    </style:style>
    <style:style style:family="paragraph" style:name="P108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4">
      <style:text-properties fo:color="#1f1f1f" fo:font-family="Arial" style:font-family-asian="Arial" style:font-family-complex="Arial" fo:font-size="12pt"/>
    </style:style>
    <style:style style:parent-style-name="950" style:family="paragraph" style:name="P108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5">
      <style:text-properties fo:color="#1f1f1f" fo:font-family="Arial" style:font-family-asian="Arial" style:font-family-complex="Arial" fo:font-size="12pt" fo:font-weight="bold"/>
    </style:style>
    <style:style style:family="paragraph" style:name="P108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6">
      <style:text-properties fo:color="#1f1f1f" fo:font-family="Arial" style:font-family-asian="Arial" style:font-family-complex="Arial" fo:font-size="12pt"/>
    </style:style>
    <style:style style:family="text" style:name="T1767">
      <style:text-properties fo:color="#1f1f1f" fo:font-family="Arial" style:font-family-asian="Arial" style:font-family-complex="Arial" fo:font-size="12pt"/>
    </style:style>
    <style:style style:parent-style-name="950" style:family="paragraph" style:name="P108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68">
      <style:text-properties fo:color="#1f1f1f" fo:font-family="Arial" style:font-family-asian="Arial" style:font-family-complex="Arial" fo:font-size="12pt" fo:font-weight="bold"/>
    </style:style>
    <style:style style:family="paragraph" style:name="P108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69">
      <style:text-properties fo:color="#1f1f1f" fo:font-family="Arial" style:font-family-asian="Arial" style:font-family-complex="Arial" fo:font-size="12pt"/>
    </style:style>
    <style:style style:family="text" style:name="T1770">
      <style:text-properties fo:color="#1f1f1f" fo:font-family="Arial" style:font-family-asian="Arial" style:font-family-complex="Arial" fo:font-size="12pt"/>
    </style:style>
    <style:style style:parent-style-name="949" style:family="paragraph" style:name="P108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71">
      <style:text-properties fo:color="#1f1f1f" fo:font-family="Arial" style:font-family-asian="Arial" style:font-family-complex="Arial" fo:font-size="14pt" fo:font-weight="bold"/>
    </style:style>
    <style:style style:parent-style-name="1010" style:list-style-name="WWNum70" style:family="paragraph" style:name="P1089">
      <style:paragraph-properties fo:line-height="115%" fo:margin-right="0cm" fo:margin-top="0pt" fo:margin-bottom="0pt" fo:border="none"/>
      <style:text-properties fo:font-family="Arial" style:font-family-asian="Arial" style:font-family-complex="Arial" fo:font-size="12pt"/>
    </style:style>
    <style:style style:family="text" style:name="T1772">
      <style:text-properties fo:color="#1f1f1f" fo:font-family="Arial" style:font-family-asian="Arial" style:font-family-complex="Arial" fo:font-size="12pt"/>
    </style:style>
    <style:style style:parent-style-name="1010" style:list-style-name="WWNum70" style:family="paragraph" style:name="P1090">
      <style:paragraph-properties fo:line-height="115%" fo:margin-right="0cm" fo:margin-top="0pt" fo:margin-bottom="0pt" fo:border="none"/>
      <style:text-properties fo:font-family="Arial" style:font-family-asian="Arial" style:font-family-complex="Arial" fo:font-size="12pt"/>
    </style:style>
    <style:style style:family="text" style:name="T1773">
      <style:text-properties fo:color="#1f1f1f" fo:font-family="Arial" style:font-family-asian="Arial" style:font-family-complex="Arial" fo:font-size="12pt"/>
    </style:style>
    <style:style style:parent-style-name="1010" style:list-style-name="WWNum70" style:family="paragraph" style:name="P1091">
      <style:paragraph-properties fo:line-height="115%" fo:margin-right="0cm" fo:margin-top="0pt" fo:margin-bottom="0pt" fo:border="none"/>
      <style:text-properties fo:font-family="Arial" style:font-family-asian="Arial" style:font-family-complex="Arial" fo:font-size="12pt"/>
    </style:style>
    <style:style style:family="text" style:name="T1774">
      <style:text-properties fo:color="#1f1f1f" fo:font-family="Arial" style:font-family-asian="Arial" style:font-family-complex="Arial" fo:font-size="12pt"/>
    </style:style>
    <style:style style:parent-style-name="1010" style:list-style-name="WWNum70" style:family="paragraph" style:name="P1092">
      <style:paragraph-properties fo:line-height="115%" fo:margin-right="0cm" fo:margin-top="0pt" fo:margin-bottom="0pt" fo:border="none"/>
      <style:text-properties fo:font-family="Arial" style:font-family-asian="Arial" style:font-family-complex="Arial" fo:font-size="12pt"/>
    </style:style>
    <style:style style:family="text" style:name="T1775">
      <style:text-properties fo:color="#1f1f1f" fo:font-family="Arial" style:font-family-asian="Arial" style:font-family-complex="Arial" fo:font-size="12pt"/>
    </style:style>
    <style:style style:family="paragraph" style:name="P1093">
      <style:paragraph-properties/>
      <style:text-properties/>
    </style:style>
    <style:style style:family="paragraph" style:name="P1094">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776">
      <style:text-properties fo:color="#1f1f1f" fo:font-family="Arial" style:font-family-asian="Arial" style:font-family-complex="Arial" fo:font-size="12pt"/>
    </style:style>
    <style:style style:parent-style-name="949" style:family="paragraph" style:name="P109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77">
      <style:text-properties fo:color="#1f1f1f" fo:font-family="Arial" style:font-family-asian="Arial" style:font-family-complex="Arial" fo:font-size="14pt" fo:font-weight="bold"/>
    </style:style>
    <style:style style:family="paragraph" style:name="P109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78">
      <style:text-properties fo:color="#1f1f1f" fo:font-family="Arial" style:font-family-asian="Arial" style:font-family-complex="Arial" fo:font-size="12pt"/>
    </style:style>
    <style:style style:parent-style-name="950" style:family="paragraph" style:name="P109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79">
      <style:text-properties fo:color="#1f1f1f" fo:font-family="Arial" style:font-family-asian="Arial" style:font-family-complex="Arial" fo:font-size="12pt" fo:font-weight="bold"/>
    </style:style>
    <style:style style:family="paragraph" style:name="P109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0">
      <style:text-properties fo:color="#1f1f1f" fo:font-family="Arial" style:font-family-asian="Arial" style:font-family-complex="Arial" fo:font-size="12pt"/>
    </style:style>
    <style:style style:parent-style-name="950" style:family="paragraph" style:name="P109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81">
      <style:text-properties fo:color="#1f1f1f" fo:font-family="Arial" style:font-family-asian="Arial" style:font-family-complex="Arial" fo:font-size="12pt" fo:font-weight="bold"/>
    </style:style>
    <style:style style:family="paragraph" style:name="P110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2">
      <style:text-properties fo:color="#1f1f1f" fo:font-family="Arial" style:font-family-asian="Arial" style:font-family-complex="Arial" fo:font-size="12pt"/>
    </style:style>
    <style:style style:parent-style-name="950" style:family="paragraph" style:name="P110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83">
      <style:text-properties fo:color="#1f1f1f" fo:font-family="Arial" style:font-family-asian="Arial" style:font-family-complex="Arial" fo:font-size="12pt" fo:font-weight="bold"/>
    </style:style>
    <style:style style:family="paragraph" style:name="P110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4">
      <style:text-properties fo:color="#1f1f1f" fo:font-family="Arial" style:font-family-asian="Arial" style:font-family-complex="Arial" fo:font-size="12pt"/>
    </style:style>
    <style:style style:parent-style-name="950" style:family="paragraph" style:name="P110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85">
      <style:text-properties fo:color="#1f1f1f" fo:font-family="Arial" style:font-family-asian="Arial" style:font-family-complex="Arial" fo:font-size="12pt" fo:font-weight="bold"/>
    </style:style>
    <style:style style:family="paragraph" style:name="P110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86">
      <style:text-properties fo:color="#1f1f1f" fo:font-family="Arial" style:font-family-asian="Arial" style:font-family-complex="Arial" fo:font-size="12pt"/>
    </style:style>
    <style:style style:parent-style-name="949" style:family="paragraph" style:name="P110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787">
      <style:text-properties fo:color="#1f1f1f" fo:font-family="Arial" style:font-family-asian="Arial" style:font-family-complex="Arial" fo:font-size="14pt" fo:font-weight="bold"/>
    </style:style>
    <style:style style:parent-style-name="1010" style:list-style-name="WWNum71" style:family="paragraph" style:name="P1106">
      <style:paragraph-properties fo:line-height="115%" fo:margin-right="0cm" fo:margin-top="0pt" fo:margin-bottom="0pt" fo:border="none"/>
      <style:text-properties fo:font-family="Arial" style:font-family-asian="Arial" style:font-family-complex="Arial" fo:font-size="12pt"/>
    </style:style>
    <style:style style:family="text" style:name="T1788">
      <style:text-properties fo:color="#1f1f1f" fo:font-family="Arial" style:font-family-asian="Arial" style:font-family-complex="Arial" fo:font-size="12pt"/>
    </style:style>
    <style:style style:parent-style-name="1010" style:list-style-name="WWNum71" style:family="paragraph" style:name="P1107">
      <style:paragraph-properties fo:line-height="115%" fo:margin-right="0cm" fo:margin-top="0pt" fo:margin-bottom="0pt" fo:border="none"/>
      <style:text-properties fo:font-family="Arial" style:font-family-asian="Arial" style:font-family-complex="Arial" fo:font-size="12pt"/>
    </style:style>
    <style:style style:family="text" style:name="T1789">
      <style:text-properties fo:color="#1f1f1f" fo:font-family="Arial" style:font-family-asian="Arial" style:font-family-complex="Arial" fo:font-size="12pt"/>
    </style:style>
    <style:style style:parent-style-name="1010" style:list-style-name="WWNum71" style:family="paragraph" style:name="P1108">
      <style:paragraph-properties fo:line-height="115%" fo:margin-right="0cm" fo:margin-top="0pt" fo:margin-bottom="0pt" fo:border="none"/>
      <style:text-properties fo:font-family="Arial" style:font-family-asian="Arial" style:font-family-complex="Arial" fo:font-size="12pt"/>
    </style:style>
    <style:style style:family="text" style:name="T1790">
      <style:text-properties fo:color="#1f1f1f" fo:font-family="Arial" style:font-family-asian="Arial" style:font-family-complex="Arial" fo:font-size="12pt"/>
    </style:style>
    <style:style style:parent-style-name="1010" style:list-style-name="WWNum71" style:family="paragraph" style:name="P1109">
      <style:paragraph-properties fo:line-height="115%" fo:margin-right="0cm" fo:margin-top="0pt" fo:margin-bottom="0pt" fo:border="none"/>
      <style:text-properties fo:font-family="Arial" style:font-family-asian="Arial" style:font-family-complex="Arial" fo:font-size="12pt"/>
    </style:style>
    <style:style style:family="text" style:name="T1791">
      <style:text-properties fo:color="#1f1f1f" fo:font-family="Arial" style:font-family-asian="Arial" style:font-family-complex="Arial" fo:font-size="12pt"/>
    </style:style>
    <style:style style:family="paragraph" style:name="P1110">
      <style:paragraph-properties/>
      <style:text-properties/>
    </style:style>
    <style:style style:parent-style-name="949" style:family="paragraph" style:name="P111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792">
      <style:text-properties fo:color="#1f1f1f" fo:font-family="Arial" style:font-family-asian="Arial" style:font-family-complex="Arial" fo:font-size="14pt" fo:font-weight="bold"/>
    </style:style>
    <style:style style:family="paragraph" style:name="P111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93">
      <style:text-properties fo:color="#1f1f1f" fo:font-family="Arial" style:font-family-asian="Arial" style:font-family-complex="Arial" fo:font-size="12pt"/>
    </style:style>
    <style:style style:parent-style-name="950" style:family="paragraph" style:name="P111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94">
      <style:text-properties fo:color="#1f1f1f" fo:font-family="Arial" style:font-family-asian="Arial" style:font-family-complex="Arial" fo:font-size="12pt" fo:font-weight="bold"/>
    </style:style>
    <style:style style:family="paragraph" style:name="P111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95">
      <style:text-properties fo:color="#1f1f1f" fo:font-family="Arial" style:font-family-asian="Arial" style:font-family-complex="Arial" fo:font-size="12pt"/>
    </style:style>
    <style:style style:parent-style-name="950" style:family="paragraph" style:name="P111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96">
      <style:text-properties fo:color="#1f1f1f" fo:font-family="Arial" style:font-family-asian="Arial" style:font-family-complex="Arial" fo:font-size="12pt" fo:font-weight="bold"/>
    </style:style>
    <style:style style:family="paragraph" style:name="P111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97">
      <style:text-properties fo:color="#1f1f1f" fo:font-family="Arial" style:font-family-asian="Arial" style:font-family-complex="Arial" fo:font-size="12pt"/>
    </style:style>
    <style:style style:parent-style-name="950" style:family="paragraph" style:name="P111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798">
      <style:text-properties fo:color="#1f1f1f" fo:font-family="Arial" style:font-family-asian="Arial" style:font-family-complex="Arial" fo:font-size="12pt" fo:font-weight="bold"/>
    </style:style>
    <style:style style:family="paragraph" style:name="P111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799">
      <style:text-properties fo:color="#1f1f1f" fo:font-family="Arial" style:font-family-asian="Arial" style:font-family-complex="Arial" fo:font-size="12pt"/>
    </style:style>
    <style:style style:parent-style-name="950" style:family="paragraph" style:name="P111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00">
      <style:text-properties fo:color="#1f1f1f" fo:font-family="Arial" style:font-family-asian="Arial" style:font-family-complex="Arial" fo:font-size="12pt" fo:font-weight="bold"/>
    </style:style>
    <style:style style:family="paragraph" style:name="P112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01">
      <style:text-properties fo:color="#1f1f1f" fo:font-family="Arial" style:font-family-asian="Arial" style:font-family-complex="Arial" fo:font-size="12pt"/>
    </style:style>
    <style:style style:parent-style-name="949" style:family="paragraph" style:name="P112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02">
      <style:text-properties fo:color="#1f1f1f" fo:font-family="Arial" style:font-family-asian="Arial" style:font-family-complex="Arial" fo:font-size="14pt" fo:font-weight="bold"/>
    </style:style>
    <style:style style:parent-style-name="1010" style:list-style-name="WWNum72" style:family="paragraph" style:name="P1122">
      <style:paragraph-properties fo:line-height="115%" fo:margin-right="0cm" fo:margin-top="0pt" fo:margin-bottom="0pt" fo:border="none"/>
      <style:text-properties fo:font-family="Arial" style:font-family-asian="Arial" style:font-family-complex="Arial" fo:font-size="12pt"/>
    </style:style>
    <style:style style:family="text" style:name="T1803">
      <style:text-properties fo:color="#1f1f1f" fo:font-family="Arial" style:font-family-asian="Arial" style:font-family-complex="Arial" fo:font-size="12pt"/>
    </style:style>
    <style:style style:parent-style-name="1010" style:list-style-name="WWNum72" style:family="paragraph" style:name="P1123">
      <style:paragraph-properties fo:line-height="115%" fo:margin-right="0cm" fo:margin-top="0pt" fo:margin-bottom="0pt" fo:border="none"/>
      <style:text-properties fo:font-family="Arial" style:font-family-asian="Arial" style:font-family-complex="Arial" fo:font-size="12pt"/>
    </style:style>
    <style:style style:family="text" style:name="T1804">
      <style:text-properties fo:color="#1f1f1f" fo:font-family="Arial" style:font-family-asian="Arial" style:font-family-complex="Arial" fo:font-size="12pt"/>
    </style:style>
    <style:style style:parent-style-name="1010" style:list-style-name="WWNum72" style:family="paragraph" style:name="P1124">
      <style:paragraph-properties fo:line-height="115%" fo:margin-right="0cm" fo:margin-top="0pt" fo:margin-bottom="0pt" fo:border="none"/>
      <style:text-properties fo:font-family="Arial" style:font-family-asian="Arial" style:font-family-complex="Arial" fo:font-size="12pt"/>
    </style:style>
    <style:style style:family="text" style:name="T1805">
      <style:text-properties fo:color="#1f1f1f" fo:font-family="Arial" style:font-family-asian="Arial" style:font-family-complex="Arial" fo:font-size="12pt"/>
    </style:style>
    <style:style style:parent-style-name="1010" style:list-style-name="WWNum72" style:family="paragraph" style:name="P1125">
      <style:paragraph-properties fo:line-height="115%" fo:margin-right="0cm" fo:margin-top="0pt" fo:margin-bottom="0pt" fo:border="none"/>
      <style:text-properties fo:font-family="Arial" style:font-family-asian="Arial" style:font-family-complex="Arial" fo:font-size="12pt"/>
    </style:style>
    <style:style style:family="text" style:name="T1806">
      <style:text-properties fo:color="#1f1f1f" fo:font-family="Arial" style:font-family-asian="Arial" style:font-family-complex="Arial" fo:font-size="12pt"/>
    </style:style>
    <style:style style:family="paragraph" style:name="P1126">
      <style:paragraph-properties/>
      <style:text-properties/>
    </style:style>
    <style:style style:family="paragraph" style:name="P1127">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807">
      <style:text-properties fo:color="#1f1f1f" fo:font-family="Arial" style:font-family-asian="Arial" style:font-family-complex="Arial" fo:font-size="12pt"/>
    </style:style>
    <style:style style:parent-style-name="949" style:family="paragraph" style:name="P112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08">
      <style:text-properties fo:color="#1f1f1f" fo:font-family="Arial" style:font-family-asian="Arial" style:font-family-complex="Arial" fo:font-size="14pt" fo:font-weight="bold"/>
    </style:style>
    <style:style style:family="paragraph" style:name="P112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09">
      <style:text-properties fo:color="#1f1f1f" fo:font-family="Arial" style:font-family-asian="Arial" style:font-family-complex="Arial" fo:font-size="12pt"/>
    </style:style>
    <style:style style:parent-style-name="950" style:family="paragraph" style:name="P113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10">
      <style:text-properties fo:color="#1f1f1f" fo:font-family="Arial" style:font-family-asian="Arial" style:font-family-complex="Arial" fo:font-size="12pt" fo:font-weight="bold"/>
    </style:style>
    <style:style style:family="paragraph" style:name="P113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11">
      <style:text-properties fo:color="#1f1f1f" fo:font-family="Arial" style:font-family-asian="Arial" style:font-family-complex="Arial" fo:font-size="12pt"/>
    </style:style>
    <style:style style:family="text" style:name="T1812">
      <style:text-properties fo:color="#1f1f1f" fo:font-family="Arial" style:font-family-asian="Arial" style:font-family-complex="Arial" fo:font-size="12pt"/>
    </style:style>
    <style:style style:parent-style-name="950" style:family="paragraph" style:name="P113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13">
      <style:text-properties fo:color="#1f1f1f" fo:font-family="Arial" style:font-family-asian="Arial" style:font-family-complex="Arial" fo:font-size="12pt" fo:font-weight="bold"/>
    </style:style>
    <style:style style:family="paragraph" style:name="P113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14">
      <style:text-properties fo:color="#1f1f1f" fo:font-family="Arial" style:font-family-asian="Arial" style:font-family-complex="Arial" fo:font-size="12pt"/>
    </style:style>
    <style:style style:family="text" style:name="T1815">
      <style:text-properties fo:color="#1f1f1f" fo:font-family="Arial" style:font-family-asian="Arial" style:font-family-complex="Arial" fo:font-size="12pt"/>
    </style:style>
    <style:style style:parent-style-name="950" style:family="paragraph" style:name="P113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16">
      <style:text-properties fo:color="#1f1f1f" fo:font-family="Arial" style:font-family-asian="Arial" style:font-family-complex="Arial" fo:font-size="12pt" fo:font-weight="bold"/>
    </style:style>
    <style:style style:family="paragraph" style:name="P113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17">
      <style:text-properties fo:color="#1f1f1f" fo:font-family="Arial" style:font-family-asian="Arial" style:font-family-complex="Arial" fo:font-size="12pt"/>
    </style:style>
    <style:style style:parent-style-name="950" style:family="paragraph" style:name="P113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18">
      <style:text-properties fo:color="#1f1f1f" fo:font-family="Arial" style:font-family-asian="Arial" style:font-family-complex="Arial" fo:font-size="12pt" fo:font-weight="bold"/>
    </style:style>
    <style:style style:family="paragraph" style:name="P113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19">
      <style:text-properties fo:color="#1f1f1f" fo:font-family="Arial" style:font-family-asian="Arial" style:font-family-complex="Arial" fo:font-size="12pt"/>
    </style:style>
    <style:style style:parent-style-name="949" style:family="paragraph" style:name="P113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20">
      <style:text-properties fo:color="#1f1f1f" fo:font-family="Arial" style:font-family-asian="Arial" style:font-family-complex="Arial" fo:font-size="14pt" fo:font-weight="bold"/>
    </style:style>
    <style:style style:parent-style-name="1010" style:list-style-name="WWNum73" style:family="paragraph" style:name="P1139">
      <style:paragraph-properties fo:line-height="115%" fo:margin-right="0cm" fo:margin-top="0pt" fo:margin-bottom="0pt" fo:border="none"/>
      <style:text-properties fo:font-family="Arial" style:font-family-asian="Arial" style:font-family-complex="Arial" fo:font-size="12pt"/>
    </style:style>
    <style:style style:family="text" style:name="T1821">
      <style:text-properties fo:color="#1f1f1f" fo:font-family="Arial" style:font-family-asian="Arial" style:font-family-complex="Arial" fo:font-size="12pt"/>
    </style:style>
    <style:style style:parent-style-name="1010" style:list-style-name="WWNum73" style:family="paragraph" style:name="P1140">
      <style:paragraph-properties fo:line-height="115%" fo:margin-right="0cm" fo:margin-top="0pt" fo:margin-bottom="0pt" fo:border="none"/>
      <style:text-properties fo:font-family="Arial" style:font-family-asian="Arial" style:font-family-complex="Arial" fo:font-size="12pt"/>
    </style:style>
    <style:style style:family="text" style:name="T1822">
      <style:text-properties fo:color="#1f1f1f" fo:font-family="Arial" style:font-family-asian="Arial" style:font-family-complex="Arial" fo:font-size="12pt"/>
    </style:style>
    <style:style style:parent-style-name="1010" style:list-style-name="WWNum73" style:family="paragraph" style:name="P1141">
      <style:paragraph-properties fo:line-height="115%" fo:margin-right="0cm" fo:margin-top="0pt" fo:margin-bottom="0pt" fo:border="none"/>
      <style:text-properties fo:font-family="Arial" style:font-family-asian="Arial" style:font-family-complex="Arial" fo:font-size="12pt"/>
    </style:style>
    <style:style style:family="text" style:name="T1823">
      <style:text-properties fo:color="#1f1f1f" fo:font-family="Arial" style:font-family-asian="Arial" style:font-family-complex="Arial" fo:font-size="12pt"/>
    </style:style>
    <style:style style:parent-style-name="1010" style:list-style-name="WWNum73" style:family="paragraph" style:name="P1142">
      <style:paragraph-properties fo:line-height="115%" fo:margin-right="0cm" fo:margin-top="0pt" fo:margin-bottom="0pt" fo:border="none"/>
      <style:text-properties fo:font-family="Arial" style:font-family-asian="Arial" style:font-family-complex="Arial" fo:font-size="12pt"/>
    </style:style>
    <style:style style:family="text" style:name="T1824">
      <style:text-properties fo:color="#1f1f1f" fo:font-family="Arial" style:font-family-asian="Arial" style:font-family-complex="Arial" fo:font-size="12pt"/>
    </style:style>
    <style:style style:family="paragraph" style:name="P1143">
      <style:paragraph-properties/>
      <style:text-properties/>
    </style:style>
    <style:style style:parent-style-name="949" style:family="paragraph" style:name="P114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825">
      <style:text-properties fo:color="#1f1f1f" fo:font-family="Arial" style:font-family-asian="Arial" style:font-family-complex="Arial" fo:font-size="14pt" fo:font-weight="bold"/>
    </style:style>
    <style:style style:family="paragraph" style:name="P114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26">
      <style:text-properties fo:color="#1f1f1f" fo:font-family="Arial" style:font-family-asian="Arial" style:font-family-complex="Arial" fo:font-size="12pt"/>
    </style:style>
    <style:style style:parent-style-name="950" style:family="paragraph" style:name="P114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27">
      <style:text-properties fo:color="#1f1f1f" fo:font-family="Arial" style:font-family-asian="Arial" style:font-family-complex="Arial" fo:font-size="12pt" fo:font-weight="bold"/>
    </style:style>
    <style:style style:family="paragraph" style:name="P114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28">
      <style:text-properties fo:color="#1f1f1f" fo:font-family="Arial" style:font-family-asian="Arial" style:font-family-complex="Arial" fo:font-size="12pt"/>
    </style:style>
    <style:style style:parent-style-name="950" style:family="paragraph" style:name="P114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29">
      <style:text-properties fo:color="#1f1f1f" fo:font-family="Arial" style:font-family-asian="Arial" style:font-family-complex="Arial" fo:font-size="12pt" fo:font-weight="bold"/>
    </style:style>
    <style:style style:family="paragraph" style:name="P114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30">
      <style:text-properties fo:color="#1f1f1f" fo:font-family="Arial" style:font-family-asian="Arial" style:font-family-complex="Arial" fo:font-size="12pt"/>
    </style:style>
    <style:style style:parent-style-name="950" style:family="paragraph" style:name="P115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31">
      <style:text-properties fo:color="#1f1f1f" fo:font-family="Arial" style:font-family-asian="Arial" style:font-family-complex="Arial" fo:font-size="12pt" fo:font-weight="bold"/>
    </style:style>
    <style:style style:family="paragraph" style:name="P115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32">
      <style:text-properties fo:color="#1f1f1f" fo:font-family="Arial" style:font-family-asian="Arial" style:font-family-complex="Arial" fo:font-size="12pt"/>
    </style:style>
    <style:style style:family="table" style:name="ta8">
      <style:paragraph-properties fo:line-height="100%" fo:margin-bottom="0pt"/>
      <style:table-properties style:width="11.92cm" fo:margin-left="0cm" table:align="left" style:use-optimal-column-width="true"/>
    </style:style>
    <style:style style:family="table-column" style:name="co19">
      <style:table-column-properties style:column-width="1.94cm" style:use-optimal-column-width="true"/>
    </style:style>
    <style:style style:family="table-column" style:name="co20">
      <style:table-column-properties style:column-width="5.068cm" style:use-optimal-column-width="true"/>
    </style:style>
    <style:style style:family="table-column" style:name="co21">
      <style:table-column-properties style:column-width="4.911cm" style:use-optimal-column-width="true"/>
    </style:style>
    <style:style style:family="table-row" style:name="ro25">
      <style:table-row-properties/>
    </style:style>
    <style:style style:family="table-cell" style:name="ce6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2">
      <style:paragraph-properties style:line-height-at-least="12pt" fo:margin-top="0pt" fo:margin-bottom="0pt"/>
      <style:text-properties/>
    </style:style>
    <style:style style:family="text" style:name="T1833">
      <style:text-properties fo:color="#1f1f1f" fo:font-family="Arial" style:font-family-asian="Arial" style:font-family-complex="Arial" fo:font-size="12pt" fo:font-weight="bold"/>
    </style:style>
    <style:style style:family="table-cell" style:name="ce7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3">
      <style:paragraph-properties style:line-height-at-least="12pt" fo:margin-top="0pt" fo:margin-bottom="0pt"/>
      <style:text-properties/>
    </style:style>
    <style:style style:family="text" style:name="T1834">
      <style:text-properties fo:color="#1f1f1f" fo:font-family="Arial" style:font-family-asian="Arial" style:font-family-complex="Arial" fo:font-size="12pt" fo:font-weight="bold"/>
    </style:style>
    <style:style style:family="table-cell" style:name="ce7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4">
      <style:paragraph-properties style:line-height-at-least="12pt" fo:margin-top="0pt" fo:margin-bottom="0pt"/>
      <style:text-properties/>
    </style:style>
    <style:style style:family="text" style:name="T1835">
      <style:text-properties fo:color="#1f1f1f" fo:font-family="Arial" style:font-family-asian="Arial" style:font-family-complex="Arial" fo:font-size="12pt" fo:font-weight="bold"/>
    </style:style>
    <style:style style:family="table-row" style:name="ro26">
      <style:table-row-properties/>
    </style:style>
    <style:style style:family="table-cell" style:name="ce7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5">
      <style:paragraph-properties style:line-height-at-least="12pt" fo:margin-top="0pt" fo:margin-bottom="0pt"/>
      <style:text-properties/>
    </style:style>
    <style:style style:family="text" style:name="T1836">
      <style:text-properties fo:color="#1f1f1f" fo:font-family="Arial" style:font-family-asian="Arial" style:font-family-complex="Arial" fo:font-size="12pt"/>
    </style:style>
    <style:style style:family="table-cell" style:name="ce7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6">
      <style:paragraph-properties style:line-height-at-least="12pt" fo:margin-top="0pt" fo:margin-bottom="0pt"/>
      <style:text-properties/>
    </style:style>
    <style:style style:family="text" style:name="T1837">
      <style:text-properties fo:color="#1f1f1f" fo:font-family="Arial" style:font-family-asian="Arial" style:font-family-complex="Arial" fo:font-size="12pt"/>
    </style:style>
    <style:style style:family="table-cell" style:name="ce7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7">
      <style:paragraph-properties style:line-height-at-least="12pt" fo:margin-top="0pt" fo:margin-bottom="0pt"/>
      <style:text-properties/>
    </style:style>
    <style:style style:family="text" style:name="T1838">
      <style:text-properties fo:color="#1f1f1f" fo:font-family="Arial" style:font-family-asian="Arial" style:font-family-complex="Arial" fo:font-size="12pt"/>
    </style:style>
    <style:style style:family="table-row" style:name="ro27">
      <style:table-row-properties/>
    </style:style>
    <style:style style:family="table-cell" style:name="ce7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8">
      <style:paragraph-properties style:line-height-at-least="12pt" fo:margin-top="0pt" fo:margin-bottom="0pt"/>
      <style:text-properties/>
    </style:style>
    <style:style style:family="text" style:name="T1839">
      <style:text-properties fo:color="#1f1f1f" fo:font-family="Arial" style:font-family-asian="Arial" style:font-family-complex="Arial" fo:font-size="12pt"/>
    </style:style>
    <style:style style:family="table-cell" style:name="ce7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59">
      <style:paragraph-properties style:line-height-at-least="12pt" fo:margin-top="0pt" fo:margin-bottom="0pt"/>
      <style:text-properties/>
    </style:style>
    <style:style style:family="text" style:name="T1840">
      <style:text-properties fo:color="#1f1f1f" fo:font-family="Arial" style:font-family-asian="Arial" style:font-family-complex="Arial" fo:font-size="12pt"/>
    </style:style>
    <style:style style:family="table-cell" style:name="ce7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60">
      <style:paragraph-properties style:line-height-at-least="12pt" fo:margin-top="0pt" fo:margin-bottom="0pt"/>
      <style:text-properties/>
    </style:style>
    <style:style style:family="text" style:name="T1841">
      <style:text-properties fo:color="#1f1f1f" fo:font-family="Arial" style:font-family-asian="Arial" style:font-family-complex="Arial" fo:font-size="12pt"/>
    </style:style>
    <style:style style:family="table-row" style:name="ro28">
      <style:table-row-properties/>
    </style:style>
    <style:style style:family="table-cell" style:name="ce7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61">
      <style:paragraph-properties style:line-height-at-least="12pt" fo:margin-top="0pt" fo:margin-bottom="0pt"/>
      <style:text-properties/>
    </style:style>
    <style:style style:family="text" style:name="T1842">
      <style:text-properties fo:color="#1f1f1f" fo:font-family="Arial" style:font-family-asian="Arial" style:font-family-complex="Arial" fo:font-size="12pt"/>
    </style:style>
    <style:style style:family="table-cell" style:name="ce7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62">
      <style:paragraph-properties style:line-height-at-least="12pt" fo:margin-top="0pt" fo:margin-bottom="0pt"/>
      <style:text-properties/>
    </style:style>
    <style:style style:family="text" style:name="T1843">
      <style:text-properties fo:color="#1f1f1f" fo:font-family="Arial" style:font-family-asian="Arial" style:font-family-complex="Arial" fo:font-size="12pt"/>
    </style:style>
    <style:style style:family="table-cell" style:name="ce8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63">
      <style:paragraph-properties style:line-height-at-least="12pt" fo:margin-top="0pt" fo:margin-bottom="0pt"/>
      <style:text-properties/>
    </style:style>
    <style:style style:family="text" style:name="T1844">
      <style:text-properties fo:color="#1f1f1f" fo:font-family="Arial" style:font-family-asian="Arial" style:font-family-complex="Arial" fo:font-size="12pt"/>
    </style:style>
    <style:style style:parent-style-name="950" style:family="paragraph" style:name="P116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45">
      <style:text-properties fo:color="#1f1f1f" fo:font-family="Arial" style:font-family-asian="Arial" style:font-family-complex="Arial" fo:font-size="12pt" fo:font-weight="bold"/>
    </style:style>
    <style:style style:family="paragraph" style:name="P116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46">
      <style:text-properties fo:color="#1f1f1f" fo:font-family="Arial" style:font-family-asian="Arial" style:font-family-complex="Arial" fo:font-size="12pt"/>
    </style:style>
    <style:style style:parent-style-name="949" style:family="paragraph" style:name="P116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47">
      <style:text-properties fo:color="#1f1f1f" fo:font-family="Arial" style:font-family-asian="Arial" style:font-family-complex="Arial" fo:font-size="14pt" fo:font-weight="bold"/>
    </style:style>
    <style:style style:parent-style-name="1010" style:list-style-name="WWNum74" style:family="paragraph" style:name="P1167">
      <style:paragraph-properties fo:line-height="115%" fo:margin-right="0cm" fo:margin-top="0pt" fo:margin-bottom="0pt" fo:border="none"/>
      <style:text-properties fo:font-family="Arial" style:font-family-asian="Arial" style:font-family-complex="Arial" fo:font-size="12pt"/>
    </style:style>
    <style:style style:family="text" style:name="T1848">
      <style:text-properties fo:color="#1f1f1f" fo:font-family="Arial" style:font-family-asian="Arial" style:font-family-complex="Arial" fo:font-size="12pt"/>
    </style:style>
    <style:style style:parent-style-name="1010" style:list-style-name="WWNum74" style:family="paragraph" style:name="P1168">
      <style:paragraph-properties fo:line-height="115%" fo:margin-right="0cm" fo:margin-top="0pt" fo:margin-bottom="0pt" fo:border="none"/>
      <style:text-properties fo:font-family="Arial" style:font-family-asian="Arial" style:font-family-complex="Arial" fo:font-size="12pt"/>
    </style:style>
    <style:style style:family="text" style:name="T1849">
      <style:text-properties fo:color="#1f1f1f" fo:font-family="Arial" style:font-family-asian="Arial" style:font-family-complex="Arial" fo:font-size="12pt"/>
    </style:style>
    <style:style style:parent-style-name="1010" style:list-style-name="WWNum74" style:family="paragraph" style:name="P1169">
      <style:paragraph-properties fo:line-height="115%" fo:margin-right="0cm" fo:margin-top="0pt" fo:margin-bottom="0pt" fo:border="none"/>
      <style:text-properties fo:font-family="Arial" style:font-family-asian="Arial" style:font-family-complex="Arial" fo:font-size="12pt"/>
    </style:style>
    <style:style style:family="text" style:name="T1850">
      <style:text-properties fo:color="#1f1f1f" fo:font-family="Arial" style:font-family-asian="Arial" style:font-family-complex="Arial" fo:font-size="12pt"/>
    </style:style>
    <style:style style:parent-style-name="1010" style:list-style-name="WWNum74" style:family="paragraph" style:name="P1170">
      <style:paragraph-properties fo:line-height="115%" fo:margin-right="0cm" fo:margin-top="0pt" fo:margin-bottom="0pt" fo:border="none"/>
      <style:text-properties fo:font-family="Arial" style:font-family-asian="Arial" style:font-family-complex="Arial" fo:font-size="12pt"/>
    </style:style>
    <style:style style:family="text" style:name="T1851">
      <style:text-properties fo:color="#1f1f1f" fo:font-family="Arial" style:font-family-asian="Arial" style:font-family-complex="Arial" fo:font-size="12pt"/>
    </style:style>
    <style:style style:family="paragraph" style:name="P1171">
      <style:paragraph-properties/>
      <style:text-properties/>
    </style:style>
    <style:style style:parent-style-name="949" style:family="paragraph" style:name="P117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852">
      <style:text-properties fo:color="#1f1f1f" fo:font-family="Arial" style:font-family-asian="Arial" style:font-family-complex="Arial" fo:font-size="14pt" fo:font-weight="bold"/>
    </style:style>
    <style:style style:family="paragraph" style:name="P117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3">
      <style:text-properties fo:color="#1f1f1f" fo:font-family="Arial" style:font-family-asian="Arial" style:font-family-complex="Arial" fo:font-size="12pt"/>
    </style:style>
    <style:style style:parent-style-name="950" style:family="paragraph" style:name="P117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54">
      <style:text-properties fo:color="#1f1f1f" fo:font-family="Arial" style:font-family-asian="Arial" style:font-family-complex="Arial" fo:font-size="12pt" fo:font-weight="bold"/>
    </style:style>
    <style:style style:family="paragraph" style:name="P117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55">
      <style:text-properties fo:color="#1f1f1f" fo:font-family="Arial" style:font-family-asian="Arial" style:font-family-complex="Arial" fo:font-size="12pt"/>
    </style:style>
    <style:style style:parent-style-name="950" style:family="paragraph" style:name="P1176">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56">
      <style:text-properties fo:color="#1f1f1f" fo:font-family="Arial" style:font-family-asian="Arial" style:font-family-complex="Arial" fo:font-size="12pt" fo:font-weight="bold"/>
    </style:style>
    <style:style style:parent-style-name="1010" style:list-style-name="WWNum75" style:family="paragraph" style:name="P1177">
      <style:paragraph-properties fo:line-height="115%" fo:margin-right="0cm" fo:margin-top="0pt" fo:margin-bottom="0pt" fo:border="none"/>
      <style:text-properties fo:font-family="Arial" style:font-family-asian="Arial" style:font-family-complex="Arial" fo:font-size="12pt"/>
    </style:style>
    <style:style style:family="text" style:name="T1857">
      <style:text-properties fo:color="#1f1f1f" fo:font-family="Arial" style:font-family-asian="Arial" style:font-family-complex="Arial" fo:font-size="12pt"/>
    </style:style>
    <style:style style:parent-style-name="1010" style:list-style-name="WWNum75" style:family="paragraph" style:name="P1178">
      <style:paragraph-properties fo:line-height="115%" fo:margin-right="0cm" fo:margin-top="0pt" fo:margin-bottom="0pt" fo:border="none"/>
      <style:text-properties fo:font-family="Arial" style:font-family-asian="Arial" style:font-family-complex="Arial" fo:font-size="12pt"/>
    </style:style>
    <style:style style:family="text" style:name="T1858">
      <style:text-properties fo:color="#1f1f1f" fo:font-family="Arial" style:font-family-asian="Arial" style:font-family-complex="Arial" fo:font-size="12pt"/>
    </style:style>
    <style:style style:parent-style-name="1010" style:list-style-name="WWNum75" style:family="paragraph" style:name="P1179">
      <style:paragraph-properties fo:line-height="115%" fo:margin-right="0cm" fo:margin-top="0pt" fo:margin-bottom="0pt" fo:border="none"/>
      <style:text-properties fo:font-family="Arial" style:font-family-asian="Arial" style:font-family-complex="Arial" fo:font-size="12pt"/>
    </style:style>
    <style:style style:family="text" style:name="T1859">
      <style:text-properties fo:color="#1f1f1f" fo:font-family="Arial" style:font-family-asian="Arial" style:font-family-complex="Arial" fo:font-size="12pt"/>
    </style:style>
    <style:style style:parent-style-name="950" style:family="paragraph" style:name="P118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60">
      <style:text-properties fo:color="#1f1f1f" fo:font-family="Arial" style:font-family-asian="Arial" style:font-family-complex="Arial" fo:font-size="12pt" fo:font-weight="bold"/>
    </style:style>
    <style:style style:family="table" style:name="ta9">
      <style:paragraph-properties fo:line-height="100%" fo:margin-bottom="0pt"/>
      <style:table-properties style:width="9.734cm" fo:margin-left="0cm" table:align="left" style:use-optimal-column-width="true"/>
    </style:style>
    <style:style style:family="table-column" style:name="co22">
      <style:table-column-properties style:column-width="1.434cm" style:use-optimal-column-width="true"/>
    </style:style>
    <style:style style:family="table-column" style:name="co23">
      <style:table-column-properties style:column-width="8.3cm" style:use-optimal-column-width="true"/>
    </style:style>
    <style:style style:family="table-row" style:name="ro29">
      <style:table-row-properties/>
    </style:style>
    <style:style style:family="table-cell" style:name="ce8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1">
      <style:paragraph-properties style:line-height-at-least="12pt" fo:margin-top="0pt" fo:margin-bottom="0pt"/>
      <style:text-properties/>
    </style:style>
    <style:style style:family="text" style:name="T1861">
      <style:text-properties fo:color="#1f1f1f" fo:font-family="Arial" style:font-family-asian="Arial" style:font-family-complex="Arial" fo:font-size="12pt" fo:font-weight="bold"/>
    </style:style>
    <style:style style:family="table-cell" style:name="ce8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2">
      <style:paragraph-properties style:line-height-at-least="12pt" fo:margin-top="0pt" fo:margin-bottom="0pt"/>
      <style:text-properties/>
    </style:style>
    <style:style style:family="text" style:name="T1862">
      <style:text-properties fo:color="#1f1f1f" fo:font-family="Arial" style:font-family-asian="Arial" style:font-family-complex="Arial" fo:font-size="12pt" fo:font-weight="bold"/>
    </style:style>
    <style:style style:family="table-row" style:name="ro30">
      <style:table-row-properties/>
    </style:style>
    <style:style style:family="table-cell" style:name="ce8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3">
      <style:paragraph-properties style:line-height-at-least="12pt" fo:margin-top="0pt" fo:margin-bottom="0pt"/>
      <style:text-properties/>
    </style:style>
    <style:style style:family="text" style:name="T1863">
      <style:text-properties fo:color="#1f1f1f" fo:font-family="Arial" style:font-family-asian="Arial" style:font-family-complex="Arial" fo:font-size="12pt"/>
    </style:style>
    <style:style style:family="table-cell" style:name="ce8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4">
      <style:paragraph-properties style:line-height-at-least="12pt" fo:margin-top="0pt" fo:margin-bottom="0pt"/>
      <style:text-properties/>
    </style:style>
    <style:style style:family="text" style:name="T1864">
      <style:text-properties fo:color="#1f1f1f" fo:font-family="Arial" style:font-family-asian="Arial" style:font-family-complex="Arial" fo:font-size="12pt"/>
    </style:style>
    <style:style style:family="table-row" style:name="ro31">
      <style:table-row-properties/>
    </style:style>
    <style:style style:family="table-cell" style:name="ce8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5">
      <style:paragraph-properties style:line-height-at-least="12pt" fo:margin-top="0pt" fo:margin-bottom="0pt"/>
      <style:text-properties/>
    </style:style>
    <style:style style:family="text" style:name="T1865">
      <style:text-properties fo:color="#1f1f1f" fo:font-family="Arial" style:font-family-asian="Arial" style:font-family-complex="Arial" fo:font-size="12pt"/>
    </style:style>
    <style:style style:family="table-cell" style:name="ce8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6">
      <style:paragraph-properties style:line-height-at-least="12pt" fo:margin-top="0pt" fo:margin-bottom="0pt"/>
      <style:text-properties/>
    </style:style>
    <style:style style:family="text" style:name="T1866">
      <style:text-properties fo:color="#1f1f1f" fo:font-family="Arial" style:font-family-asian="Arial" style:font-family-complex="Arial" fo:font-size="12pt"/>
    </style:style>
    <style:style style:family="table-row" style:name="ro32">
      <style:table-row-properties/>
    </style:style>
    <style:style style:family="table-cell" style:name="ce8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7">
      <style:paragraph-properties style:line-height-at-least="12pt" fo:margin-top="0pt" fo:margin-bottom="0pt"/>
      <style:text-properties/>
    </style:style>
    <style:style style:family="text" style:name="T1867">
      <style:text-properties fo:color="#1f1f1f" fo:font-family="Arial" style:font-family-asian="Arial" style:font-family-complex="Arial" fo:font-size="12pt"/>
    </style:style>
    <style:style style:family="table-cell" style:name="ce8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188">
      <style:paragraph-properties style:line-height-at-least="12pt" fo:margin-top="0pt" fo:margin-bottom="0pt"/>
      <style:text-properties/>
    </style:style>
    <style:style style:family="text" style:name="T1868">
      <style:text-properties fo:color="#1f1f1f" fo:font-family="Arial" style:font-family-asian="Arial" style:font-family-complex="Arial" fo:font-size="12pt"/>
    </style:style>
    <style:style style:family="paragraph" style:name="P118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69">
      <style:text-properties fo:color="#1f1f1f" fo:font-family="Arial" style:font-family-asian="Arial" style:font-family-complex="Arial" fo:font-size="12pt"/>
    </style:style>
    <style:style style:parent-style-name="950" style:family="paragraph" style:name="P119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70">
      <style:text-properties fo:color="#1f1f1f" fo:font-family="Arial" style:font-family-asian="Arial" style:font-family-complex="Arial" fo:font-size="12pt" fo:font-weight="bold"/>
    </style:style>
    <style:style style:family="paragraph" style:name="P119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71">
      <style:text-properties fo:color="#1f1f1f" fo:font-family="Arial" style:font-family-asian="Arial" style:font-family-complex="Arial" fo:font-size="12pt"/>
    </style:style>
    <style:style style:parent-style-name="949" style:family="paragraph" style:name="P119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72">
      <style:text-properties fo:color="#1f1f1f" fo:font-family="Arial" style:font-family-asian="Arial" style:font-family-complex="Arial" fo:font-size="14pt" fo:font-weight="bold"/>
    </style:style>
    <style:style style:parent-style-name="1010" style:list-style-name="WWNum75" style:family="paragraph" style:name="P1193">
      <style:paragraph-properties fo:line-height="115%" fo:margin-right="0cm" fo:margin-top="0pt" fo:margin-bottom="0pt" fo:border="none"/>
      <style:text-properties fo:font-family="Arial" style:font-family-asian="Arial" style:font-family-complex="Arial" fo:font-size="12pt"/>
    </style:style>
    <style:style style:family="text" style:name="T1873">
      <style:text-properties fo:color="#1f1f1f" fo:font-family="Arial" style:font-family-asian="Arial" style:font-family-complex="Arial" fo:font-size="12pt"/>
    </style:style>
    <style:style style:parent-style-name="1010" style:list-style-name="WWNum75" style:family="paragraph" style:name="P1194">
      <style:paragraph-properties fo:line-height="115%" fo:margin-right="0cm" fo:margin-top="0pt" fo:margin-bottom="0pt" fo:border="none"/>
      <style:text-properties fo:font-family="Arial" style:font-family-asian="Arial" style:font-family-complex="Arial" fo:font-size="12pt"/>
    </style:style>
    <style:style style:family="text" style:name="T1874">
      <style:text-properties fo:color="#1f1f1f" fo:font-family="Arial" style:font-family-asian="Arial" style:font-family-complex="Arial" fo:font-size="12pt"/>
    </style:style>
    <style:style style:parent-style-name="1010" style:list-style-name="WWNum75" style:family="paragraph" style:name="P1195">
      <style:paragraph-properties fo:line-height="115%" fo:margin-right="0cm" fo:margin-top="0pt" fo:margin-bottom="0pt" fo:border="none"/>
      <style:text-properties fo:font-family="Arial" style:font-family-asian="Arial" style:font-family-complex="Arial" fo:font-size="12pt"/>
    </style:style>
    <style:style style:family="text" style:name="T1875">
      <style:text-properties fo:color="#1f1f1f" fo:font-family="Arial" style:font-family-asian="Arial" style:font-family-complex="Arial" fo:font-size="12pt"/>
    </style:style>
    <style:style style:parent-style-name="1010" style:list-style-name="WWNum75" style:family="paragraph" style:name="P1196">
      <style:paragraph-properties fo:line-height="115%" fo:margin-right="0cm" fo:margin-top="0pt" fo:margin-bottom="0pt" fo:border="none"/>
      <style:text-properties fo:font-family="Arial" style:font-family-asian="Arial" style:font-family-complex="Arial" fo:font-size="12pt"/>
    </style:style>
    <style:style style:family="text" style:name="T1876">
      <style:text-properties fo:color="#1f1f1f" fo:font-family="Arial" style:font-family-asian="Arial" style:font-family-complex="Arial" fo:font-size="12pt"/>
    </style:style>
    <style:style style:family="paragraph" style:name="P1197">
      <style:paragraph-properties/>
      <style:text-properties/>
    </style:style>
    <style:style style:family="paragraph" style:name="P1198">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877">
      <style:text-properties fo:color="#1f1f1f" fo:font-family="Arial" style:font-family-asian="Arial" style:font-family-complex="Arial" fo:font-size="12pt"/>
    </style:style>
    <style:style style:parent-style-name="949" style:family="paragraph" style:name="P119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78">
      <style:text-properties fo:color="#1f1f1f" fo:font-family="Arial" style:font-family-asian="Arial" style:font-family-complex="Arial" fo:font-size="14pt" fo:font-weight="bold"/>
    </style:style>
    <style:style style:family="paragraph" style:name="P120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79">
      <style:text-properties fo:color="#1f1f1f" fo:font-family="Arial" style:font-family-asian="Arial" style:font-family-complex="Arial" fo:font-size="12pt"/>
    </style:style>
    <style:style style:parent-style-name="950" style:family="paragraph" style:name="P120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0">
      <style:text-properties fo:color="#1f1f1f" fo:font-family="Arial" style:font-family-asian="Arial" style:font-family-complex="Arial" fo:font-size="12pt" fo:font-weight="bold"/>
    </style:style>
    <style:style style:family="paragraph" style:name="P120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1">
      <style:text-properties fo:color="#1f1f1f" fo:font-family="Arial" style:font-family-asian="Arial" style:font-family-complex="Arial" fo:font-size="12pt"/>
    </style:style>
    <style:style style:family="text" style:name="T1882">
      <style:text-properties fo:color="#1f1f1f" fo:font-family="Arial" style:font-family-asian="Arial" style:font-family-complex="Arial" fo:font-size="12pt"/>
    </style:style>
    <style:style style:parent-style-name="950" style:family="paragraph" style:name="P120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3">
      <style:text-properties fo:color="#1f1f1f" fo:font-family="Arial" style:font-family-asian="Arial" style:font-family-complex="Arial" fo:font-size="12pt" fo:font-weight="bold"/>
    </style:style>
    <style:style style:family="paragraph" style:name="P120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4">
      <style:text-properties fo:color="#1f1f1f" fo:font-family="Arial" style:font-family-asian="Arial" style:font-family-complex="Arial" fo:font-size="12pt"/>
    </style:style>
    <style:style style:parent-style-name="950" style:family="paragraph" style:name="P120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5">
      <style:text-properties fo:color="#1f1f1f" fo:font-family="Arial" style:font-family-asian="Arial" style:font-family-complex="Arial" fo:font-size="12pt" fo:font-weight="bold"/>
    </style:style>
    <style:style style:family="paragraph" style:name="P120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6">
      <style:text-properties fo:color="#1f1f1f" fo:font-family="Arial" style:font-family-asian="Arial" style:font-family-complex="Arial" fo:font-size="12pt"/>
    </style:style>
    <style:style style:family="text" style:name="T1887">
      <style:text-properties fo:color="#1f1f1f" fo:font-family="Arial" style:font-family-asian="Arial" style:font-family-complex="Arial" fo:font-size="12pt"/>
    </style:style>
    <style:style style:parent-style-name="950" style:family="paragraph" style:name="P120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88">
      <style:text-properties fo:color="#1f1f1f" fo:font-family="Arial" style:font-family-asian="Arial" style:font-family-complex="Arial" fo:font-size="12pt" fo:font-weight="bold"/>
    </style:style>
    <style:style style:family="paragraph" style:name="P120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89">
      <style:text-properties fo:color="#1f1f1f" fo:font-family="Arial" style:font-family-asian="Arial" style:font-family-complex="Arial" fo:font-size="12pt"/>
    </style:style>
    <style:style style:parent-style-name="949" style:family="paragraph" style:name="P120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90">
      <style:text-properties fo:color="#1f1f1f" fo:font-family="Arial" style:font-family-asian="Arial" style:font-family-complex="Arial" fo:font-size="14pt" fo:font-weight="bold"/>
    </style:style>
    <style:style style:parent-style-name="1010" style:list-style-name="WWNum76" style:family="paragraph" style:name="P1210">
      <style:paragraph-properties fo:line-height="115%" fo:margin-right="0cm" fo:margin-top="0pt" fo:margin-bottom="0pt" fo:border="none"/>
      <style:text-properties fo:font-family="Arial" style:font-family-asian="Arial" style:font-family-complex="Arial" fo:font-size="12pt"/>
    </style:style>
    <style:style style:family="text" style:name="T1891">
      <style:text-properties fo:color="#1f1f1f" fo:font-family="Arial" style:font-family-asian="Arial" style:font-family-complex="Arial" fo:font-size="12pt"/>
    </style:style>
    <style:style style:parent-style-name="1010" style:list-style-name="WWNum76" style:family="paragraph" style:name="P1211">
      <style:paragraph-properties fo:line-height="115%" fo:margin-right="0cm" fo:margin-top="0pt" fo:margin-bottom="0pt" fo:border="none"/>
      <style:text-properties fo:font-family="Arial" style:font-family-asian="Arial" style:font-family-complex="Arial" fo:font-size="12pt"/>
    </style:style>
    <style:style style:family="text" style:name="T1892">
      <style:text-properties fo:color="#1f1f1f" fo:font-family="Arial" style:font-family-asian="Arial" style:font-family-complex="Arial" fo:font-size="12pt"/>
    </style:style>
    <style:style style:parent-style-name="1010" style:list-style-name="WWNum76" style:family="paragraph" style:name="P1212">
      <style:paragraph-properties fo:line-height="115%" fo:margin-right="0cm" fo:margin-top="0pt" fo:margin-bottom="0pt" fo:border="none"/>
      <style:text-properties fo:font-family="Arial" style:font-family-asian="Arial" style:font-family-complex="Arial" fo:font-size="12pt"/>
    </style:style>
    <style:style style:family="text" style:name="T1893">
      <style:text-properties fo:color="#1f1f1f" fo:font-family="Arial" style:font-family-asian="Arial" style:font-family-complex="Arial" fo:font-size="12pt"/>
    </style:style>
    <style:style style:parent-style-name="1010" style:list-style-name="WWNum76" style:family="paragraph" style:name="P1213">
      <style:paragraph-properties fo:line-height="115%" fo:margin-right="0cm" fo:margin-top="0pt" fo:margin-bottom="0pt" fo:border="none"/>
      <style:text-properties fo:font-family="Arial" style:font-family-asian="Arial" style:font-family-complex="Arial" fo:font-size="12pt"/>
    </style:style>
    <style:style style:family="text" style:name="T1894">
      <style:text-properties fo:color="#1f1f1f" fo:font-family="Arial" style:font-family-asian="Arial" style:font-family-complex="Arial" fo:font-size="12pt"/>
    </style:style>
    <style:style style:family="paragraph" style:name="P1214">
      <style:paragraph-properties/>
      <style:text-properties/>
    </style:style>
    <style:style style:family="paragraph" style:name="P1215">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895">
      <style:text-properties fo:color="#1f1f1f" fo:font-family="Arial" style:font-family-asian="Arial" style:font-family-complex="Arial" fo:font-size="12pt"/>
    </style:style>
    <style:style style:parent-style-name="949" style:family="paragraph" style:name="P121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896">
      <style:text-properties fo:color="#1f1f1f" fo:font-family="Arial" style:font-family-asian="Arial" style:font-family-complex="Arial" fo:font-size="14pt" fo:font-weight="bold"/>
    </style:style>
    <style:style style:family="paragraph" style:name="P1217">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97">
      <style:text-properties fo:color="#1f1f1f" fo:font-family="Arial" style:font-family-asian="Arial" style:font-family-complex="Arial" fo:font-size="12pt"/>
    </style:style>
    <style:style style:parent-style-name="950" style:family="paragraph" style:name="P1218">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898">
      <style:text-properties fo:color="#1f1f1f" fo:font-family="Arial" style:font-family-asian="Arial" style:font-family-complex="Arial" fo:font-size="12pt" fo:font-weight="bold"/>
    </style:style>
    <style:style style:family="paragraph" style:name="P1219">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899">
      <style:text-properties fo:color="#1f1f1f" fo:font-family="Arial" style:font-family-asian="Arial" style:font-family-complex="Arial" fo:font-size="12pt"/>
    </style:style>
    <style:style style:parent-style-name="950" style:family="paragraph" style:name="P1220">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00">
      <style:text-properties fo:color="#1f1f1f" fo:font-family="Arial" style:font-family-asian="Arial" style:font-family-complex="Arial" fo:font-size="12pt" fo:font-weight="bold"/>
    </style:style>
    <style:style style:family="paragraph" style:name="P1221">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01">
      <style:text-properties fo:color="#1f1f1f" fo:font-family="Arial" style:font-family-asian="Arial" style:font-family-complex="Arial" fo:font-size="12pt"/>
    </style:style>
    <style:style style:parent-style-name="950" style:family="paragraph" style:name="P1222">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02">
      <style:text-properties fo:color="#1f1f1f" fo:font-family="Arial" style:font-family-asian="Arial" style:font-family-complex="Arial" fo:font-size="12pt" fo:font-weight="bold"/>
    </style:style>
    <style:style style:family="paragraph" style:name="P1223">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03">
      <style:text-properties fo:color="#1f1f1f" fo:font-family="Arial" style:font-family-asian="Arial" style:font-family-complex="Arial" fo:font-size="12pt"/>
    </style:style>
    <style:style style:parent-style-name="950" style:family="paragraph" style:name="P1224">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04">
      <style:text-properties fo:color="#1f1f1f" fo:font-family="Arial" style:font-family-asian="Arial" style:font-family-complex="Arial" fo:font-size="12pt" fo:font-weight="bold"/>
    </style:style>
    <style:style style:family="paragraph" style:name="P1225">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05">
      <style:text-properties fo:color="#1f1f1f" fo:font-family="Arial" style:font-family-asian="Arial" style:font-family-complex="Arial" fo:font-size="12pt"/>
    </style:style>
    <style:style style:parent-style-name="949" style:family="paragraph" style:name="P122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06">
      <style:text-properties fo:color="#1f1f1f" fo:font-family="Arial" style:font-family-asian="Arial" style:font-family-complex="Arial" fo:font-size="14pt" fo:font-weight="bold"/>
    </style:style>
    <style:style style:parent-style-name="1010" style:list-style-name="WWNum77" style:family="paragraph" style:name="P1227">
      <style:paragraph-properties fo:line-height="115%" fo:margin-right="0cm" fo:margin-top="0pt" fo:margin-bottom="0pt" fo:border="none"/>
      <style:text-properties fo:font-family="Arial" style:font-family-asian="Arial" style:font-family-complex="Arial" fo:font-size="12pt"/>
    </style:style>
    <style:style style:family="text" style:name="T1907">
      <style:text-properties fo:color="#1f1f1f" fo:font-family="Arial" style:font-family-asian="Arial" style:font-family-complex="Arial" fo:font-size="12pt"/>
    </style:style>
    <style:style style:parent-style-name="1010" style:list-style-name="WWNum77" style:family="paragraph" style:name="P1228">
      <style:paragraph-properties fo:line-height="115%" fo:margin-right="0cm" fo:margin-top="0pt" fo:margin-bottom="0pt" fo:border="none"/>
      <style:text-properties fo:font-family="Arial" style:font-family-asian="Arial" style:font-family-complex="Arial" fo:font-size="12pt"/>
    </style:style>
    <style:style style:family="text" style:name="T1908">
      <style:text-properties fo:color="#1f1f1f" fo:font-family="Arial" style:font-family-asian="Arial" style:font-family-complex="Arial" fo:font-size="12pt"/>
    </style:style>
    <style:style style:parent-style-name="1010" style:list-style-name="WWNum77" style:family="paragraph" style:name="P1229">
      <style:paragraph-properties fo:line-height="115%" fo:margin-right="0cm" fo:margin-top="0pt" fo:margin-bottom="0pt" fo:border="none"/>
      <style:text-properties fo:font-family="Arial" style:font-family-asian="Arial" style:font-family-complex="Arial" fo:font-size="12pt"/>
    </style:style>
    <style:style style:family="text" style:name="T1909">
      <style:text-properties fo:color="#1f1f1f" fo:font-family="Arial" style:font-family-asian="Arial" style:font-family-complex="Arial" fo:font-size="12pt"/>
    </style:style>
    <style:style style:parent-style-name="1010" style:list-style-name="WWNum77" style:family="paragraph" style:name="P1230">
      <style:paragraph-properties fo:line-height="115%" fo:margin-right="0cm" fo:margin-top="0pt" fo:margin-bottom="0pt" fo:border="none"/>
      <style:text-properties fo:font-family="Arial" style:font-family-asian="Arial" style:font-family-complex="Arial" fo:font-size="12pt"/>
    </style:style>
    <style:style style:family="text" style:name="T1910">
      <style:text-properties fo:color="#1f1f1f" fo:font-family="Arial" style:font-family-asian="Arial" style:font-family-complex="Arial" fo:font-size="12pt"/>
    </style:style>
    <style:style style:family="paragraph" style:name="P1231">
      <style:paragraph-properties/>
      <style:text-properties/>
    </style:style>
    <style:style style:family="paragraph" style:name="P1232">
      <style:paragraph-properties fo:line-height="115%" fo:margin-left="0cm" fo:margin-right="0cm" fo:text-indent="0cm" fo:margin-top="0pt" fo:margin-bottom="0pt" fo:break-before="page" fo:border="none"/>
      <style:text-properties fo:font-family="Arial" style:font-family-asian="Arial" style:font-family-complex="Arial" fo:font-size="12pt"/>
    </style:style>
    <style:style style:family="text" style:name="T1911">
      <style:text-properties fo:color="#1f1f1f" fo:font-family="Arial" style:font-family-asian="Arial" style:font-family-complex="Arial" fo:font-size="12pt"/>
    </style:style>
    <style:style style:parent-style-name="949" style:family="paragraph" style:name="P12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12">
      <style:text-properties fo:color="#1f1f1f" fo:font-family="Arial" style:font-family-asian="Arial" style:font-family-complex="Arial" fo:font-size="14pt" fo:font-weight="bold"/>
    </style:style>
    <style:style style:family="paragraph" style:name="P123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13">
      <style:text-properties fo:color="#1f1f1f" fo:font-family="Arial" style:font-family-asian="Arial" style:font-family-complex="Arial" fo:font-size="12pt"/>
    </style:style>
    <style:style style:parent-style-name="950" style:family="paragraph" style:name="P123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14">
      <style:text-properties fo:color="#1f1f1f" fo:font-family="Arial" style:font-family-asian="Arial" style:font-family-complex="Arial" fo:font-size="12pt" fo:font-weight="bold"/>
    </style:style>
    <style:style style:family="paragraph" style:name="P123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15">
      <style:text-properties fo:color="#1f1f1f" fo:font-family="Arial" style:font-family-asian="Arial" style:font-family-complex="Arial" fo:font-size="12pt"/>
    </style:style>
    <style:style style:parent-style-name="950" style:family="paragraph" style:name="P123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16">
      <style:text-properties fo:color="#1f1f1f" fo:font-family="Arial" style:font-family-asian="Arial" style:font-family-complex="Arial" fo:font-size="12pt" fo:font-weight="bold"/>
    </style:style>
    <style:style style:family="paragraph" style:name="P123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17">
      <style:text-properties fo:color="#1f1f1f" fo:font-family="Arial" style:font-family-asian="Arial" style:font-family-complex="Arial" fo:font-size="12pt"/>
    </style:style>
    <style:style style:parent-style-name="950" style:family="paragraph" style:name="P1239">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18">
      <style:text-properties fo:color="#1f1f1f" fo:font-family="Arial" style:font-family-asian="Arial" style:font-family-complex="Arial" fo:font-size="12pt" fo:font-weight="bold"/>
    </style:style>
    <style:style style:family="paragraph" style:name="P124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19">
      <style:text-properties fo:color="#1f1f1f" fo:font-family="Arial" style:font-family-asian="Arial" style:font-family-complex="Arial" fo:font-size="12pt"/>
    </style:style>
    <style:style style:parent-style-name="950" style:family="paragraph" style:name="P124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20">
      <style:text-properties fo:color="#1f1f1f" fo:font-family="Arial" style:font-family-asian="Arial" style:font-family-complex="Arial" fo:font-size="12pt" fo:font-weight="bold"/>
    </style:style>
    <style:style style:family="paragraph" style:name="P124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21">
      <style:text-properties fo:color="#1f1f1f" fo:font-family="Arial" style:font-family-asian="Arial" style:font-family-complex="Arial" fo:font-size="12pt"/>
    </style:style>
    <style:style style:parent-style-name="949" style:family="paragraph" style:name="P124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22">
      <style:text-properties fo:color="#1f1f1f" fo:font-family="Arial" style:font-family-asian="Arial" style:font-family-complex="Arial" fo:font-size="14pt" fo:font-weight="bold"/>
    </style:style>
    <style:style style:parent-style-name="1010" style:list-style-name="WWNum78" style:family="paragraph" style:name="P1244">
      <style:paragraph-properties fo:line-height="115%" fo:margin-right="0cm" fo:margin-top="0pt" fo:margin-bottom="0pt" fo:border="none"/>
      <style:text-properties fo:font-family="Arial" style:font-family-asian="Arial" style:font-family-complex="Arial" fo:font-size="12pt"/>
    </style:style>
    <style:style style:family="text" style:name="T1923">
      <style:text-properties fo:color="#1f1f1f" fo:font-family="Arial" style:font-family-asian="Arial" style:font-family-complex="Arial" fo:font-size="12pt"/>
    </style:style>
    <style:style style:parent-style-name="1010" style:list-style-name="WWNum78" style:family="paragraph" style:name="P1245">
      <style:paragraph-properties fo:line-height="115%" fo:margin-right="0cm" fo:margin-top="0pt" fo:margin-bottom="0pt" fo:border="none"/>
      <style:text-properties fo:font-family="Arial" style:font-family-asian="Arial" style:font-family-complex="Arial" fo:font-size="12pt"/>
    </style:style>
    <style:style style:family="text" style:name="T1924">
      <style:text-properties fo:color="#1f1f1f" fo:font-family="Arial" style:font-family-asian="Arial" style:font-family-complex="Arial" fo:font-size="12pt"/>
    </style:style>
    <style:style style:parent-style-name="1010" style:list-style-name="WWNum78" style:family="paragraph" style:name="P1246">
      <style:paragraph-properties fo:line-height="115%" fo:margin-right="0cm" fo:margin-top="0pt" fo:margin-bottom="0pt" fo:border="none"/>
      <style:text-properties fo:font-family="Arial" style:font-family-asian="Arial" style:font-family-complex="Arial" fo:font-size="12pt"/>
    </style:style>
    <style:style style:family="text" style:name="T1925">
      <style:text-properties fo:color="#1f1f1f" fo:font-family="Arial" style:font-family-asian="Arial" style:font-family-complex="Arial" fo:font-size="12pt"/>
    </style:style>
    <style:style style:parent-style-name="1010" style:list-style-name="WWNum78" style:family="paragraph" style:name="P1247">
      <style:paragraph-properties fo:line-height="115%" fo:margin-right="0cm" fo:margin-top="0pt" fo:margin-bottom="0pt" fo:border="none"/>
      <style:text-properties fo:font-family="Arial" style:font-family-asian="Arial" style:font-family-complex="Arial" fo:font-size="12pt"/>
    </style:style>
    <style:style style:family="text" style:name="T1926">
      <style:text-properties fo:color="#1f1f1f" fo:font-family="Arial" style:font-family-asian="Arial" style:font-family-complex="Arial" fo:font-size="12pt"/>
    </style:style>
    <style:style style:family="paragraph" style:name="P1248">
      <style:paragraph-properties/>
      <style:text-properties/>
    </style:style>
    <style:style style:parent-style-name="949" style:family="paragraph" style:name="P124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927">
      <style:text-properties fo:color="#1f1f1f" fo:font-family="Arial" style:font-family-asian="Arial" style:font-family-complex="Arial" fo:font-size="14pt" fo:font-weight="bold"/>
    </style:style>
    <style:style style:family="paragraph" style:name="P1250">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28">
      <style:text-properties fo:color="#1f1f1f" fo:font-family="Arial" style:font-family-asian="Arial" style:font-family-complex="Arial" fo:font-size="12pt"/>
    </style:style>
    <style:style style:parent-style-name="950" style:family="paragraph" style:name="P1251">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29">
      <style:text-properties fo:color="#1f1f1f" fo:font-family="Arial" style:font-family-asian="Arial" style:font-family-complex="Arial" fo:font-size="12pt" fo:font-weight="bold"/>
    </style:style>
    <style:style style:family="paragraph" style:name="P1252">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30">
      <style:text-properties fo:color="#1f1f1f" fo:font-family="Arial" style:font-family-asian="Arial" style:font-family-complex="Arial" fo:font-size="12pt"/>
    </style:style>
    <style:style style:parent-style-name="950" style:family="paragraph" style:name="P1253">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31">
      <style:text-properties fo:color="#1f1f1f" fo:font-family="Arial" style:font-family-asian="Arial" style:font-family-complex="Arial" fo:font-size="12pt" fo:font-weight="bold"/>
    </style:style>
    <style:style style:family="paragraph" style:name="P1254">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32">
      <style:text-properties fo:color="#1f1f1f" fo:font-family="Arial" style:font-family-asian="Arial" style:font-family-complex="Arial" fo:font-size="12pt"/>
    </style:style>
    <style:style style:parent-style-name="950" style:family="paragraph" style:name="P1255">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33">
      <style:text-properties fo:color="#1f1f1f" fo:font-family="Arial" style:font-family-asian="Arial" style:font-family-complex="Arial" fo:font-size="12pt" fo:font-weight="bold"/>
    </style:style>
    <style:style style:family="paragraph" style:name="P1256">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34">
      <style:text-properties fo:color="#1f1f1f" fo:font-family="Arial" style:font-family-asian="Arial" style:font-family-complex="Arial" fo:font-size="12pt"/>
    </style:style>
    <style:style style:parent-style-name="950" style:family="paragraph" style:name="P1257">
      <style:paragraph-properties fo:line-height="115%" fo:margin-left="0cm" fo:margin-right="0cm" fo:text-indent="0cm" fo:margin-top="0pt" fo:border="none"/>
      <style:text-properties fo:color="#0f4761" fo:font-family="Arial" style:font-family-asian="Arial" style:font-family-complex="Arial" fo:font-size="12pt" fo:font-style="italic"/>
    </style:style>
    <style:style style:family="text" style:name="T1935">
      <style:text-properties fo:color="#1f1f1f" fo:font-family="Arial" style:font-family-asian="Arial" style:font-family-complex="Arial" fo:font-size="12pt" fo:font-weight="bold"/>
    </style:style>
    <style:style style:family="paragraph" style:name="P1258">
      <style:paragraph-properties fo:line-height="115%" fo:margin-left="0cm" fo:margin-right="0cm" fo:text-indent="0cm" fo:margin-top="0pt" fo:margin-bottom="0pt" fo:border="none"/>
      <style:text-properties fo:font-family="Arial" style:font-family-asian="Arial" style:font-family-complex="Arial" fo:font-size="12pt"/>
    </style:style>
    <style:style style:family="text" style:name="T1936">
      <style:text-properties fo:color="#1f1f1f" fo:font-family="Arial" style:font-family-asian="Arial" style:font-family-complex="Arial" fo:font-size="12pt"/>
    </style:style>
    <style:style style:family="text" style:name="T1937">
      <style:text-properties fo:color="#1f1f1f" fo:font-family="Arial" style:font-family-asian="Arial" style:font-family-complex="Arial" fo:font-size="12pt"/>
    </style:style>
    <style:style style:parent-style-name="949" style:family="paragraph" style:name="P125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938">
      <style:text-properties fo:color="#1f1f1f" fo:font-family="Arial" style:font-family-asian="Arial" style:font-family-complex="Arial" fo:font-size="14pt" fo:font-weight="bold"/>
    </style:style>
    <style:style style:parent-style-name="1010" style:list-style-name="WWNum79" style:family="paragraph" style:name="P1260">
      <style:paragraph-properties fo:line-height="115%" fo:margin-right="0cm" fo:margin-top="0pt" fo:margin-bottom="0pt" fo:border="none"/>
      <style:text-properties fo:font-family="Arial" style:font-family-asian="Arial" style:font-family-complex="Arial" fo:font-size="12pt"/>
    </style:style>
    <style:style style:family="text" style:name="T1939">
      <style:text-properties fo:color="#1f1f1f" fo:font-family="Arial" style:font-family-asian="Arial" style:font-family-complex="Arial" fo:font-size="12pt"/>
    </style:style>
    <style:style style:parent-style-name="1010" style:list-style-name="WWNum79" style:family="paragraph" style:name="P1261">
      <style:paragraph-properties fo:line-height="115%" fo:margin-right="0cm" fo:margin-top="0pt" fo:margin-bottom="0pt" fo:border="none"/>
      <style:text-properties fo:font-family="Arial" style:font-family-asian="Arial" style:font-family-complex="Arial" fo:font-size="12pt"/>
    </style:style>
    <style:style style:family="text" style:name="T1940">
      <style:text-properties fo:color="#1f1f1f" fo:font-family="Arial" style:font-family-asian="Arial" style:font-family-complex="Arial" fo:font-size="12pt"/>
    </style:style>
    <style:style style:parent-style-name="1010" style:list-style-name="WWNum79" style:family="paragraph" style:name="P1262">
      <style:paragraph-properties fo:line-height="115%" fo:margin-right="0cm" fo:margin-top="0pt" fo:margin-bottom="0pt" fo:border="none"/>
      <style:text-properties fo:font-family="Arial" style:font-family-asian="Arial" style:font-family-complex="Arial" fo:font-size="12pt"/>
    </style:style>
    <style:style style:family="text" style:name="T1941">
      <style:text-properties fo:color="#1f1f1f" fo:font-family="Arial" style:font-family-asian="Arial" style:font-family-complex="Arial" fo:font-size="12pt"/>
    </style:style>
    <style:style style:parent-style-name="1010" style:list-style-name="WWNum79" style:family="paragraph" style:name="P1263">
      <style:paragraph-properties fo:line-height="115%" fo:margin-right="0cm" fo:margin-top="0pt" fo:margin-bottom="0pt" fo:border="none"/>
      <style:text-properties fo:font-family="Arial" style:font-family-asian="Arial" style:font-family-complex="Arial" fo:font-size="12pt"/>
    </style:style>
    <style:style style:family="text" style:name="T1942">
      <style:text-properties fo:color="#1f1f1f" fo:font-family="Arial" style:font-family-asian="Arial" style:font-family-complex="Arial" fo:font-size="12pt"/>
    </style:style>
    <style:style style:family="paragraph" style:name="P1264">
      <style:paragraph-properties/>
      <style:text-properties/>
    </style:style>
  </office:automatic-styles>
  <office:body>
    <office:text text:use-soft-page-breaks="true">
      <text:p text:style-name="P33"><text:span text:style-name="T743">[🟢 Online Mode | 26.06.01_11:43:58]</text:span><text:span/></text:p>
      <text:p text:style-name="P34"><text:span text:style-name="T744">1. 문수사리 보살 찬탄과 삼신 성취의 영적 연금술</text:span><text:span/></text:p>
      <text:p text:style-name="P35"><text:span text:style-name="T745">🔑 핵심 키워드: 정화의 대상, 생기와 원만 차제, 법보화 삼신, 쌍운의 바즈라다라</text:span><text:span/></text:p>
      <text:p text:style-name="P36"><text:span text:style-name="T746">🎡 윤회의 고리와 거친 철광석</text:span><text:span/></text:p>
      <text:p text:style-name="P37"><text:span text:style-name="T747">우리가 겪는 태어남, 죽음, 그리고 그 사이의 중간 상태인 바르도는 정화되어야 할 거친 철광석과 같아. 마치 먼지와 매연으로 뒤덮인 채 덜컹거리는 오래된 중고차처럼, 본래의 가치를 잃어버리고 번뇌 속에서 굴러가고 있는 상태를 뜻하지. 불교에서는 이 끊임없이 반복되는 삶과 죽음의 순환 고리를 수행을 통해 완전히 깨끗하게 씻어내야 할 근본 무대로 바라보고 있어.</text:span><text:span/></text:p>
      <text:p text:style-name="P38"><text:span text:style-name="T748">⚗️ 황금을 만드는 두 단계의 연금술</text:span><text:span/></text:p>
      <text:p text:style-name="P39"><text:span text:style-name="T749">투박한 철광석을 눈부신 황금으로 바꾸기 위해 수행자들은 생기차제와 원만차제라는 고도의 영적 연금술을 사용해. 생기차제가 마음속으로 신성한 정토를 정밀하게 그리는 건축 설계도 작업이라면, 원만차제는 몸 안의 미세한 에너지를 완전히 제어하여 건물을 단단하게 지어 올리는 실제 시공 과정과 같아. 이 깊은 명상의 두 단계를 거치면서 내면의 무거운 부정적 에너지는 최고의 지혜로 탈바꿈하게 되지.</text:span><text:span/></text:p>
      <text:p text:style-name="P40"><text:span text:style-name="T750">💎 연금술로 피어난 세 가지 결실</text:span><text:span/></text:p>
      <text:p text:style-name="P41"><text:span text:style-name="T751">연금술이 성공하면 정화의 완전한 결실인 법신, 보신, 화신의 삼신이 자연스럽게 드러나게 돼. 법신은 우주의 진리 그 자체와 하나가 된 청정한 지혜이고, 보신은 수행의 공덕으로 찬란하게 빛나는 빛의 몸이며, 화신은 고통받는 중생을 구하기 위해 역사 속에 직접 나타난 자비의 모습이야. 이것은 시스템 오류로 버벅거리는 스마트폰을 완전히 공장 초기화해서 최초의 깨끗하고 완벽한 상태로 되돌리는 것과 비슷해.</text:span><text:span/></text:p>
      <text:p text:style-name="P42"><text:span text:style-name="T752">👑 완벽한 합일의 주인에게 올리는 예배</text:span><text:span/></text:p>
      <text:p text:style-name="P43"><text:span text:style-name="T753">지혜와 자비가 물과 우유처럼 완벽하게 하나로 녹아든 경지를 쌍운이라고 부르는데, 이 모든 깨달음의 세계를 자유자재로 다스리는 근본 부처님이 바로 바즈라다라야. 온 마음을 다해 문수사리 보살과 바즈라다라 부처님께 고개를 숙여 정례하는 것은 내 안의 교만한 아상을 완전히 내려놓는 계기가 돼. 진흙 속에 묻혀 있던 거친 원석이 마침내 눈부신 다이아몬드로 완전하게 제 가치를 드러내는 성스러운 과정이지.</text:span><text:span/></text:p>
      <text:p text:style-name="P44"><text:span text:style-name="T754">📝 핵심 요약</text:span><text:span/></text:p>
      <text:list text:style-name="WWNum11" text:continue-numbering="true">
        <text:list-item>
          <text:p text:style-name="P45"><text:span text:style-name="T755">삶과 죽음, 그리고 바르도는 깨끗하게 정화해야 할 거친 철광석과 같은 무대야.</text:span><text:span/></text:p>
        </text:list-item>
        <text:list-item>
          <text:p text:style-name="P46"><text:span text:style-name="T756">생기와 원만 두 차제의 명상은 이 철광석을 순수한 황금으로 바꾸는 영적 연금술이지.</text:span><text:span/></text:p>
        </text:list-item>
        <text:list-item>
          <text:p text:style-name="P47"><text:span text:style-name="T757">정화가 완료되면 진리, 공덕, 자비를 상징하는 법신, 보신, 화신의 삼신을 성취하게 돼.</text:span><text:span/></text:p>
        </text:list-item>
        <text:list-item>
          <text:p text:style-name="P48"><text:span text:style-name="T758">지혜와 자비가 완벽하게 하나 된 쌍운의 경지이자 깨달음의 주인인 바즈라다라에게 귀의하는 내용이야.</text:span><text:span/></text:p>
        </text:list-item>
      </text:list>
      <text:p text:style-name="P49"><text:span><text:soft-page-break/></text:span><text:span/></text:p>
      <text:p text:style-name="P50"><text:span text:style-name="T759">2. 무상유가딴뜨라의 심오한 수행과 삼신의 정화</text:span><text:span/></text:p>
      <text:p text:style-name="P51"><text:span text:style-name="T760">🔑 핵심 키워드: 무상유가딴뜨라, 삼신, 생기차제, 원만차제, 바르도, 죽음의 은멸차제</text:span><text:span/></text:p>
      <text:p text:style-name="P52"><text:span text:style-name="T761">🚀 오탁악세의 가장 빠른 지름길</text:span><text:span/></text:p>
      <text:p text:style-name="P53"><text:span text:style-name="T762">우리가 사는 이 복잡하고 어지러운 세상에서 단 한 번의 짧은 생애 동안 붓다의 경지에 이르는 비밀의 문이 바로 무상유가딴뜨라야. 이것은 마치 복잡한 미로를 헤매지 않고 목적지까지 단숨에 날아가는 초고속 자기부상열차와 같지. 이 깊고 오묘한 가르침을 통해 수행자는 일곱 가지 덕성을 완벽하게 갖춘 칠지화합의 쌍운이라는 존재, 즉 바즈라다라의 원만한 몸을 이번 생에 직접 실현할 수 있어. 이 놀라운 변화를 이루기 위해서는 먼저 우리가 가진 기본 바탕을 어떻게 </text:span><text:span text:style-name="T763">정화하고 바꾸어 나갈지 그 구체적인 진행 경로를 정확하게 이해하는 것이 첫걸음이야.</text:span><text:span/></text:p>
      <text:p text:style-name="P54"><text:span text:style-name="T764">💎 정화의 원래 바탕이 되는 삼신의 구조</text:span><text:span/></text:p>
      <text:p text:style-name="P55"><text:span text:style-name="T765">수행을 통해 깨달음을 얻으려면 먼저 우리에게 본래부터 갖추어져 있는 세 가지 기본 구조를 제대로 알아야 해. 불교에서는 이를 법신, 보신, 화신이라는 삼신 구조로 설명하는데, 이는 마치 가공되지 않은 원석 속에 이미 아름다운 보석의 가능성이 숨어있는 것과 같아. 우리에게 내재된 이 인위의 삼신 구조를 올바르게 인지하고 바르게 아는 것이 더없이 중요해. 범속하고 평범한 우리의 일상적인 상태가 바로 깨달음의 몸으로 변모할 정화의 원래 바탕이 되기 때문이지.</text:span><text:span/></text:p>
      <text:p text:style-name="P56"><text:span text:style-name="T766">🛠️ 생기와 원만이라는 두 가지 변형 도구</text:span><text:span/></text:p>
      <text:p text:style-name="P57"><text:span text:style-name="T767">원석을 아름다운 반지로 만들기 위해 제련하는 과정처럼, 무상유가딴뜨라에는 생기차제와 원만차제라는 두 가지 강력한 수행 단계가 있어. 생기차제는 평범하고 범속한 나 자신을 본존의 몸으로 일으키는 연습 단계이고, 원만차제는 그 상상을 넘어 실제로 나를 본존의 몸으로 변화시키는 실전 단계야. 이 두 가지 도구를 능숙하게 통달해야만 비로소 우리 내면의 거친 에너지를 고결하고 순수한 깨달음의 상태로 완벽하게 전환할 수 있게 돼.</text:span><text:span/></text:p>
      <text:p text:style-name="P58"><text:span text:style-name="T768">🔄 죽음과 바르도 그리고 새로운 탄생의 순환</text:span><text:span/></text:p>
      <text:p text:style-name="P59"><text:span text:style-name="T769">이 정화 수행이 실제로 적용되는 구체적인 무대는 바로 탄생과 죽음, 그리고 바르도로 이어지는 세 가지 순환 과정이야. 이 과정은 밤에 잠이 들고, 꿈을 꾸고, 다시 아침에 깨어나는 일상적인 리듬과 매우 닮아 있어. 구체적으로는 죽음이 일어나는 과정을 설명한 죽음의 은멸차제, 죽음 뒤의 세계를 설명한 바르도의 성립차제, 그리고 바르도 상태에서 육도세계에 다시 태어나는 생유의 몸을 받는 도리로 나뉘지. 이 세 가지 자연스러운 흐름을 수행의 도구로 삼아 정화할</text:span><text:span text:style-name="T770"> 때 우리는 생사의 윤회를 끊고 자유를 얻을 수 있어.</text:span><text:span/></text:p>
      <text:p text:style-name="P60"><text:span text:style-name="T771">📝 핵심 요약</text:span><text:span/></text:p>
      <text:list text:style-name="WWNum12" text:continue-numbering="true">
        <text:list-item>
          <text:p text:style-name="P61"><text:span text:style-name="T772">무상유가딴뜨라는 오탁악세의 짧은 생애에 바즈라다라의 몸을 성취하는 지름길이다.</text:span><text:span/></text:p>
        </text:list-item>
        <text:list-item>
          <text:p text:style-name="P62"><text:span text:style-name="T773">정화의 핵심 바탕은 본래 우리에게 있는 법신, 보신, 화신의 삼신 구조를 바르게 아는 것이다.</text:span><text:span/></text:p>
        </text:list-item>
        <text:list-item>
          <text:p text:style-name="P63"><text:span text:style-name="T774">수행은 범속한 자신을 본존으로 일으키는 생기차제와 실제로 변화시키는 원만차제로 이루어진다.</text:span><text:span/></text:p>
        </text:list-item>
        <text:list-item>
          <text:p text:style-name="P64"><text:span text:style-name="T775">죽음의 은멸차제, 바르도의 성립차제, 생유의 도리를 통해 삶과 죽음의 순환을 정화한다.</text:span><text:span/></text:p>
        </text:list-item>
      </text:list>
      <text:p text:style-name="P65"><text:span><text:soft-page-break/></text:span><text:span/></text:p>
      <text:p text:style-name="P66"><text:span text:style-name="T776">3. 최초 인간들이 지닌 일곱 가지 신비로운 특성</text:span><text:span/></text:p>
      <text:p text:style-name="P67"><text:span text:style-name="T777">🔑 핵심 키워드: 화생, 무량한 수명, 신체 완전성, 자가 광명, 상호 장엄, 희열식, 신통 비행</text:span><text:span/></text:p>
      <text:p text:style-name="P68"><text:span text:style-name="T778">🌌 첫 번째 겁의 탄생과 영원한 수명</text:span><text:span/></text:p>
      <text:p text:style-name="P69"><text:span text:style-name="T779">아주 먼 옛날, 이 세계가 처음 만들어진 첫 번째 겁의 시기에 남섬부주에 살았던 최초의 인간들은 지금의 우리와는 완전히 다른 방식으로 존재했어. 이들은 부모의 신체적 매개 없이 스스로 온전하게 태어나는 화생의 방식을 취했는데, 이는 마치 어두운 방에 스위치를 켜자마자 빛이 가득 차듯 아무런 중간 과정 없이 세상에 온전한 존재로 나타난 것과 같아. 게다가 그들의 수명은 끝을 헤아릴 수 없을 정도로 무량하여, 시간의 흐름에 구애받지 않고 영원에 가까운 풍요로</text:span><text:span text:style-name="T780">운 삶을 마음껏 누릴 수 있었지.</text:span><text:span/></text:p>
      <text:p text:style-name="P70"><text:span text:style-name="T781">✨ 완전한 감각과 스스로 빛나는 육체</text:span><text:span/></text:p>
      <text:p text:style-name="P71"><text:span text:style-name="T782">그들의 신체적 조건 또한 결함이 없는 완벽함 그 자체였어. 태어나는 그 첫 순간부터 눈, 코, 입을 비롯한 몸의 모든 감각 기관과 신체 부위가 일체의 부족함 없이 완전하게 갖추어져 있었거든. 흥미로운 점은 그들이 어둠을 밝힐 외부의 빛이나 몸을 가릴 옷을 전혀 필요로 하지 않았다는 거야. 그들의 육체 자체에서 스스로 빛나는 광명이 뿜어져 나와 온몸을 따스하게 감싸고 있었는데, 이는 마치 스스로 빛을 내는 밤하늘의 별과 같았어. 이 빛나는 몸은 부처님의 거</text:span><text:span text:style-name="T783">룩한 모습을 닮은 고귀한 상호로 장엄되어 있어서 존재 자체로 깊은 신성함을 풍겼지.</text:span><text:span/></text:p>
      <text:p text:style-name="P72"><text:span text:style-name="T784">🍃 기쁨을 영양분으로 삼는 맑은 삶</text:span><text:span/></text:p>
      <text:p text:style-name="P73"><text:span text:style-name="T785">생명을 유지하고 에너지를 얻는 방식도 물질적인 것에 전혀 의존하지 않았어. 우리가 오늘날 먹는 거칠고 무거운 음식 대신, 이들은 오직 마음의 깊은 기쁨과 평온함만을 영양분으로 삼는 희열식을 즐겼지. 이는 마치 우리가 어떤 아름다운 예술 작품이나 순수한 즐거움에 완전히 몰입해 있을 때, 배고픔이나 피로를 전혀 느끼지 못하고 온몸에 새로운 에너지가 샘솟는 것과 매우 비슷한 이치야. 물질적인 섭취와 소화 과정이 필요 없었기 때문에 그들의 내면과 외면은 어떤 탁</text:span><text:span text:style-name="T786">함도 없이 늘 맑고 가벼운 상태를 유지할 수 있었어.</text:span><text:span/></text:p>
      <text:p text:style-name="P74"><text:span text:style-name="T787">🦅 하늘을 나는 자유와 일곱 가지 특성</text:span><text:span/></text:p>
      <text:p text:style-name="P75"><text:span text:style-name="T788">마지막으로 이러한 물질적 제약에서의 자유로움은 초자연적인 신통력이라는 아름다운 결과로 이어졌어. 그들은 어떤 기계나 도구의 도움 없이도, 오직 자유로운 의지와 마음의 움직임만으로 끝없는 하늘을 자유롭게 날아다닐 수 있는 신통을 지니고 있었지. 스스로 탄생하는 신비로움, 헤아릴 수 없는 긴 수명, 완전한 신체 기관, 스스로 빛나는 몸, 부처를 닮은 거룩한 상호, 기쁨으로 가득 찬 식사, 그리고 하늘을 나는 자유로움까지 이 일곱 가지 특성이 바로 세상의 시작</text:span><text:span text:style-name="T789">점에 존재했던 최초 인간들이 누렸던 온전한 삶의 모습이야.</text:span><text:span/></text:p>
      <text:p text:style-name="P76"><text:span text:style-name="T790">📝 핵심 요약</text:span><text:span/></text:p>
      <text:list text:style-name="WWNum13" text:continue-numbering="true">
        <text:list-item>
          <text:p text:style-name="P77"><text:span text:style-name="T791">최초의 인간들은 매개체 없이 스스로 태어나는 화생의 존재였으며 무량한 수명을 누렸다.</text:span><text:span/></text:p>
        </text:list-item>
        <text:list-item>
          <text:p text:style-name="P78"><text:span text:style-name="T792">온몸에서 스스로 빛이 났고 감각 기관이 완벽했으며 부처를 닮은 상호를 갖추었다.</text:span><text:span/></text:p>
        </text:list-item>
        <text:list-item>
          <text:p text:style-name="P79"><text:span text:style-name="T793">거친 음식 대신 삼매와 법의 기쁨을 먹는 희열식으로 영양을 섭취했다.</text:span><text:span/></text:p>
        </text:list-item>
        <text:list-item>
          <text:p text:style-name="P80"><text:span text:style-name="T794">물질적 제약이 없어 의지대로 하늘을 자유롭게 날아다닐 수 있는 신통을 발휘했다.</text:span><text:span/></text:p>
        </text:list-item>
      </text:list>
      <text:p text:style-name="P81"><text:span><text:soft-page-break/></text:span><text:span/></text:p>
      <text:p text:style-name="P82"><text:span text:style-name="T795">4. 과거세 습기의 각성과 육체적 기관의 형성</text:span><text:span/></text:p>
      <text:p text:style-name="P83"><text:span text:style-name="T796">🔑 핵심 키워드: 과거세 습기, 거친 음식, 대소변 잔해, 신체 기관 형성</text:span><text:span/></text:p>
      <text:p text:style-name="P84"><text:span text:style-name="T797">🌀 잠재의식의 깨어남</text:span><text:span/></text:p>
      <text:p text:style-name="P85"><text:span text:style-name="T798">인간이 순수한 빛의 상태에서 무거운 물질적 존재로 변화하는 첫 단추는 바로 마음속 깊이 숨겨져 있던 과거의 습기, 즉 잠재적 집착이 깨어나는 순간이야. 이는 마치 봄이 오면 땅속에 얼어붙어 있던 씨앗이 자신도 모르게 싹을 틔우듯, 이전 생에 가졌던 음식에 대한 강한 욕망이 어떤 계기를 만나 다시 고개를 드는 것과 같아. 깨끗했던 도화지에 아주 작은 오염의 가능성이 고개를 드는 시점이지.</text:span><text:span/></text:p>
      <text:p text:style-name="P86"><text:span text:style-name="T799">🍎 거친 음식의 섭취</text:span><text:span/></text:p>
      <text:p text:style-name="P87"><text:span text:style-name="T800">잠재된 욕망이 눈을 뜨면서 인간은 점차 미세하고 청정한 에너지 대신 입으로 직접 씹어 먹는 거친 음식을 갈구하고 섭취하게 돼. 이 과정은 고성능 정밀 기계에 정제되지 않은 불량 연료를 주입하는 상황으로 비유할 수 있어. 연료가 순수하지 못하니 기계 내부에서 제대로 연소되지 않고 그을음이 생기는 원리와 정확히 일치하지.</text:span><text:span/></text:p>
      <text:list text:style-name="WWNum14" text:continue-numbering="true">
        <text:list-item>
          <text:p text:style-name="P88"><text:span text:style-name="T801">욕망의 발현: 미세한 에너지에서 물질적 자극으로 의식이 이동함</text:span><text:span/></text:p>
        </text:list-item>
        <text:list-item>
          <text:p text:style-name="P89"><text:span text:style-name="T802">연료의 변화: 순수한 빛의 영양소 대신 둔탁한 물질적 음식을 선택함</text:span><text:span/></text:p>
        </text:list-item>
      </text:list>
      <text:p text:style-name="P90"><text:span text:style-name="T803">🌊 잔해의 발생과 대소변</text:span><text:span/></text:p>
      <text:p text:style-name="P91"><text:span text:style-name="T804">몸속으로 들어온 거친 물질들은 완벽하게 흡수되지 못하고 필연적으로 대소변이라는 잔해를 남기게 되지. 맑고 투명하던 에너지 순환 체계에 탁하고 무거운 노폐물이 고이기 시작하면서 최초의 청정함이 무너지는 단계야. 투명한 시냇물에 진흙이 유입되어 바닥에 이물질이 차오르는 것처럼, 인간의 몸은 점차 물질적인 한계에 직면하게 돼.</text:span><text:span/></text:p>
      <text:p text:style-name="P92"><text:span text:style-name="T805">🧬 남녀 기관의 형성과 구속</text:span><text:span/></text:p>
      <text:p text:style-name="P93"><text:span text:style-name="T806">내부에 쌓여가는 노폐물을 밖으로 내보내기 위해 우리 몸은 결국 배설을 위한 문을 만들 수밖에 없었고, 이 과정에서 배출구로서의 남녀 신체 기관이 겉으로 돌출되며 고착화되었어. 공장에 오물이 쌓이자 새로운 배출구를 뚫고 배수관을 설치한 셈이지. 이로 인해 인간은 완벽한 통합 상태를 잃고 육체적 한계 속에 갇히게 되었어.</text:span><text:span/></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94"><text:span text:style-name="T807">구분</text:span><text:span/></text:p>
          </table:table-cell>
          <table:table-cell table:style-name="ce3">
            <text:p text:style-name="P95"><text:span text:style-name="T808">변화 전 상태</text:span><text:span/></text:p>
          </table:table-cell>
          <table:table-cell table:style-name="ce4">
            <text:p text:style-name="P96"><text:span text:style-name="T809">변화 후 상태</text:span><text:span/></text:p>
          </table:table-cell>
        </table:table-row>
        <table:table-row table:style-name="ro2" table:default-cell-style-name="ce1">
          <table:table-cell table:style-name="ce5">
            <text:p text:style-name="P97"><text:span text:style-name="T810">신체 형태</text:span><text:span/></text:p>
          </table:table-cell>
          <table:table-cell table:style-name="ce6">
            <text:p text:style-name="P98"><text:span text:style-name="T811">빛으로 이루어진 청정한 일체형 구조</text:span><text:span/></text:p>
          </table:table-cell>
          <table:table-cell table:style-name="ce7">
            <text:p text:style-name="P99"><text:span text:style-name="T812">배설과 생식을 위한 분화된 기관 형성</text:span><text:span/></text:p>
          </table:table-cell>
        </table:table-row>
        <table:table-row table:style-name="ro3" table:default-cell-style-name="ce1">
          <table:table-cell table:style-name="ce8">
            <text:p text:style-name="P100"><text:span text:style-name="T813">존재 방식</text:span><text:span/></text:p>
          </table:table-cell>
          <table:table-cell table:style-name="ce9">
            <text:p text:style-name="P101"><text:span text:style-name="T814">자유로운 신통력과 영적 존재</text:span><text:span/></text:p>
          </table:table-cell>
          <table:table-cell table:style-name="ce10">
            <text:p text:style-name="P102"><text:span text:style-name="T815">육체적 한계와 이분법적 구속</text:span><text:span/></text:p>
          </table:table-cell>
        </table:table-row>
      </table:table>
      <text:p text:style-name="P103"><text:span text:style-name="T816">📝 핵심 요약</text:span><text:span/></text:p>
      <text:list text:style-name="WWNum14" text:continue-numbering="true">
        <text:list-item>
          <text:p text:style-name="P104"><text:span text:style-name="T817">마음속 깊이 숨어 있던 음식에 대한 잠재적 집착이 깨어나면서 육체적 변화가 시작됨</text:span><text:span/></text:p>
        </text:list-item>
        <text:list-item>
          <text:p text:style-name="P105"><text:span text:style-name="T818">청정한 에너지 대신 거친 음식을 먹으면서 몸 안에 소화되지 못한 노폐물이 발생함</text:span><text:span/></text:p>
        </text:list-item>
        <text:list-item>
          <text:p text:style-name="P106"><text:span text:style-name="T819">노폐물을 배출하기 위한 통로가 필요해지면서 남녀의 신체 기관이 겉으로 나타남</text:span><text:span/></text:p>
        </text:list-item>
        <text:list-item>
          <text:p text:style-name="P107"><text:span text:style-name="T820">결과적으로 순수한 빛의 존재였던 인간이 물질적 한계와 이분법적 구조에 구속되는 계기가 됨</text:span><text:span/></text:p>
        </text:list-item>
      </text:list>
      <text:p text:style-name="P108"><text:span><text:soft-page-break/></text:span><text:span/></text:p>
      <text:p text:style-name="P109"><text:span text:style-name="T821">[🟢 Online Mode | 26.06.01_12:00:25]</text:span><text:span/></text:p>
      <text:p text:style-name="P110"><text:span text:style-name="T822">5. 과거의 업과 인간 탄생의 신비</text:span><text:span/></text:p>
      <text:p text:style-name="P111"><text:span text:style-name="T823">🔑 핵심 키워드: 과거세의 습기, 연모와 음행, 자궁의 잉태, 태생의 인간</text:span><text:span/></text:p>
      <text:p text:style-name="P112"><text:span text:style-name="T824">🧬 과거의 습기와 인연의 자석</text:span><text:span/></text:p>
      <text:p text:style-name="P113"><text:span text:style-name="T825">과거 세상에서 함께했던 성적 행동의 기억과 습관은 마치 눈에 보이지 않는 강력한 자석과 같아. 비유하자면, 우리가 어릴 때 자주 듣던 노래를 오랜 시간이 흘러 길거리에서 우연히 들었을 때 무의식적으로 몸이 먼저 반응하고 따라 부르게 되는 것과 비슷하지. 이러한 과거의 습기가 마음속에 깊이 남아 있는 두 존재는 새로운 생을 마주했을 때 시공간을 넘어 서로에게 강하게 이끌릴 수밖에 없어.</text:span><text:span/></text:p>
      <text:p text:style-name="P114"><text:span text:style-name="T826">💑 음행을 통한 생명의 결합</text:span><text:span/></text:p>
      <text:p text:style-name="P115"><text:span text:style-name="T827">서로에게 강한 애착을 느낀 두 존재는 결국 힘을 합쳐 음행을 저지르게 되는데, 이는 단순한 신체적 결합을 넘어 새로운 생명이 이 세상에 발을 디디는 결정적인 계기가 돼. 마치 두 개의 서로 다른 원소가 만나 격렬한 화학 반응을 일으키며 완전히 새로운 물질을 만들어내는 과정과 흡사하지. 이러한 강렬한 이끌림과 행동의 에너지를 바탕으로 어머니의 자궁 안에 마침내 하나의 온전한 생명체가 자리를 잡게 돼.</text:span><text:span/></text:p>
      <text:p text:style-name="P116"><text:span text:style-name="T828">🌱 자궁 안에서 자라나는 생명</text:span><text:span/></text:p>
      <text:p text:style-name="P117"><text:span text:style-name="T829">자궁에 자리를 잡은 생명은 고정된 상태로 멈춰 있는 것이 아니라, 시간이 흐름에 따라 점차 세포를 나누고 형태를 갖추며 단계적으로 자라나게 돼. 이것은 작은 씨앗이 땅속에 심겨 눈에 보이지 않는 어둠 속에서 조금씩 뿌리를 내리고 줄기를 뻗어 올리는 과정과 아주 똑같아. 자궁이라는 따뜻하고 안전한 공간 속에서 존재는 인간의 모습을 완벽하게 갖추기 위한 준비를 차근차근 진행하는 거지.</text:span><text:span/></text:p>
      <text:p text:style-name="P118"><text:span text:style-name="T830">👶 화생에서 태생으로의 진화</text:span><text:span/></text:p>
      <text:p text:style-name="P119"><text:span text:style-name="T831">이전의 발생 방식에서 벗어나 점차 어머니의 몸을 통해 태어나는 태생의 인간으로 바뀌는 과정은 생명의 역사에서 엄청나게 거대한 변화야. 스스로 온전한 모습으로 세상에 나타나던 기존의 방식에서 벗어나, 모태라는 울타리 안에서 양분을 먹고 자라나 세상 밖으로 나오는 형태로 전환된 것이지. 이는 마치 애벌레가 번데기라는 인고의 단계를 거쳐 완전히 새로운 나비로 탈바꿈하여 하늘을 나는 극적인 변화와도 같아.</text:span><text:span/></text:p>
      <text:p text:style-name="P120"><text:span text:style-name="T832">📝 핵심 요약</text:span><text:span/></text:p>
      <text:list text:style-name="WWNum15" text:continue-numbering="true">
        <text:list-item>
          <text:p text:style-name="P121"><text:span text:style-name="T833">과거의 성적 습기는 시공간을 초월해 두 존재를 끌어당기는 강력한 무의식적 원동력이 됨.</text:span><text:span/></text:p>
        </text:list-item>
        <text:list-item>
          <text:p text:style-name="P122"><text:span text:style-name="T834">두 존재의 연모와 음행을 계기로 하여 자궁 속에 새로운 생명체가 안정적으로 잉태됨.</text:span><text:span/></text:p>
        </text:list-item>
        <text:list-item>
          <text:p text:style-name="P123"><text:span text:style-name="T835">자궁 내부에서 생명은 단계적인 성장 과정을 거치며 점차 온전한 신체 형태를 확립함.</text:span><text:span/></text:p>
        </text:list-item>
        <text:list-item>
          <text:p text:style-name="P124"><text:span text:style-name="T836">기존의 발생 방식에서 모태를 통해 태어나는 태생의 인간으로 극적인 존재 방식의 전환이 이루어짐.</text:span><text:span/></text:p>
        </text:list-item>
      </text:list>
      <text:p text:style-name="P125"><text:span><text:soft-page-break/></text:span><text:span/></text:p>
      <text:p text:style-name="P126"><text:span text:style-name="T837">[🟢 Online Mode | 26.06.01_12:06:06]</text:span><text:span/></text:p>
      <text:p text:style-name="P127"><text:span text:style-name="T838">6. 남섬부주 인간을 구성하는 육계의 비밀</text:span><text:span/></text:p>
      <text:p text:style-name="P128"><text:span text:style-name="T839">🔑 핵심 키워드: 육계, 사대, 맥과 명점, 부모의 유산, 남섬부주 태생</text:span><text:span/></text:p>
      <text:p text:style-name="P129"><text:span text:style-name="T840">🌍 남섬부주와 태생 인간의 출발점</text:span><text:span/></text:p>
      <text:p text:style-name="P130"><text:span text:style-name="T841">우리가 살고 있는 이 세계를 불교 세계관에서는 남섬부주라고 부른다. 이곳에서 어머니의 태를 통해 태어나는 인간은 아주 특별한 조건을 갖추고 있어. 마치 우주에서 가장 정밀하게 설계된 아바타 슈트를 입고 태어나는 것과 같지. 이 특별한 아바타 슈트가 제대로 작동하기 위해서는 여섯 가지 필수 성분인 육계가 완벽하게 갖추어져야 해. 육계를 모두 구비해야만 비로소 이 땅에서 온전한 생명체로 살아갈 수 있는 자격이 주어지는 거야.</text:span><text:span/></text:p>
      <text:p text:style-name="P131"><text:span text:style-name="T842">⚡ 에너지로 이루어진 여섯 가지 성분</text:span><text:span/></text:p>
      <text:p text:style-name="P132"><text:span text:style-name="T843">첫 번째 관점에서는 육계를 우주의 기운과 인체의 에너지 통로로 설명해. 자연을 이루는 네 가지 기본 원소인 땅, 물, 불, 바람에다가 우리 몸의 미세한 에너지 통로인 맥, 그리고 그 통로를 흐르는 생명의 정수인 명점을 더한 구성이지. 이것은 집을 지을 때 단단한 벽돌인 사대만 있어서는 안 되고, 집 안 구석구석에 전선인 맥을 깔고 전구인 명점을 밝혀야 비로소 사람이 살 수 있는 따뜻한 공간이 되는 것과 똑같은 이치야.</text:span><text:span/></text:p>
      <text:p text:style-name="P133"><text:span text:style-name="T844">🧬 부모에게서 물려받은 물질적 유산</text:span><text:span/></text:p>
      <text:p text:style-name="P134"><text:span text:style-name="T845">또 다른 관점에서는 이 여섯 가지 성분을 부모님께 물리적으로 물려받은 혈육의 유산으로 보기도 해. 아버지가 전해준 세 가지 성분인 뼈, 골수, 정액과 어머니가 물려준 세 가지 성분인 살, 피부, 피가 합쳐져서 비로소 여섯 가지 성분이 완성된다는 뜻이지. 우리가 레고 블록을 조립할 때 파란색 상자인 아버지와 빨간색 상자인 어머니에게서 각각 핵심 부품 세 개씩을 꺼내어 하나의 멋진 로봇을 완성하는 모습을 상상하면 이해하기 쉬울 거야.</text:span><text:span/></text:p>
      <text:p text:style-name="P135"><text:span text:style-name="T846">☯️ 온전한 생명으로서의 조화와 균형</text:span><text:span/></text:p>
      <text:p text:style-name="P136"><text:span text:style-name="T847">결국 에너지적인 측면이든 물리적인 측면이든, 이 여섯 가지 성분이 모두 빈틈없이 채워져야만 온전한 남섬부주의 인간이라고 할 수 있어. 이 성분들은 서로 독립되어 있는 것처럼 보이지만 실제로는 정밀한 기계의 톱니바퀴처럼 긴밀하게 맞물려 돌아가지. 어느 하나라도 부족하거나 균형이 깨지면 생명이라는 거대한 시스템이 멈추게 되므로, 육계를 온전히 갖추었다는 것은 그 자체로 거대한 우주의 조화가 내 몸 안에서 실현되었다는 증거야.</text:span><text:span/></text:p>
      <text:p text:style-name="P137"><text:span text:style-name="T848">📝 핵심 요약</text:span><text:span/></text:p>
      <text:list text:style-name="WWNum16" text:continue-numbering="true">
        <text:list-item>
          <text:p text:style-name="P138"><text:span text:style-name="T849">남섬부주에서 태를 통해 태어나는 인간은 여섯 가지 성분인 육계를 반드시 갖추어야 한다.</text:span><text:span/></text:p>
        </text:list-item>
        <text:list-item>
          <text:p text:style-name="P139"><text:span text:style-name="T850">육계는 땅, 물, 불, 바람의 사대와 에너지가 흐르는 맥 및 명점으로 해석된다.</text:span><text:span/></text:p>
        </text:list-item>
        <text:list-item>
          <text:p text:style-name="P140"><text:span text:style-name="T851">또 다른 관점에서는 아버지가 준 세 성분과 어머니가 준 세 성분의 결합으로 본다.</text:span><text:span/></text:p>
        </text:list-item>
        <text:list-item>
          <text:p text:style-name="P141"><text:span text:style-name="T852">이 성분들이 조화를 이루어야만 온전한 생명 시스템이 유지될 수 있다.</text:span><text:span/></text:p>
        </text:list-item>
      </text:list>
      <text:p text:style-name="P142"><text:span><text:soft-page-break/></text:span><text:span/></text:p>
      <text:p text:style-name="P143"><text:span text:style-name="T853">[🟢 Online Mode | 26.06.01_11:57:29]</text:span><text:span/></text:p>
      <text:p text:style-name="P144"><text:span text:style-name="T854">7. 한 생에 성불을 이루는 최상의 비밀</text:span><text:span/></text:p>
      <text:p text:style-name="P145"><text:span text:style-name="T855">🔑 핵심 키워드: 무상유가 밀교, 탁세성불, 육계구족, 인간의 몸</text:span><text:span/></text:p>
      <text:p text:style-name="P146"><text:span text:style-name="T856">⚡ 탁세의 짧은 수명과 초고속 성불</text:span><text:span/></text:p>
      <text:p text:style-name="P147"><text:span text:style-name="T857">우리가 살고 있는 이 혼란스럽고 수명이 짧은 시대에서도 단 한 번의 생에 완전히 깨달음을 얻는 특별한 길이 있어. 무상유가 밀교의 가르침이 바로 그것인데, 이것은 마치 시간이 얼마 남지 않은 마감 직전에 초고속 파일 압축기를 사용해서 방대한 데이터를 순식간에 전송하는 것과 같아. 보통의 수행이 아주 오랜 세월 동안 걸어서 가는 여정이라면, 이 길은 가장 효율적인 경로를 찾아 단숨에 목적지까지 날아가는 인공위성과 같은 강력한 몰입을 선사하지.</text:span><text:span/></text:p>
      <text:p text:style-name="P148"><text:span text:style-name="T858">🏗️ 여섯 가지 원소로 이루어진 완벽한 설계</text:span><text:span/></text:p>
      <text:p text:style-name="P149"><text:span text:style-name="T859">이처럼 초고속으로 성불하기 위해서는 반드시 부모로부터 물려받은 여섯 가지 원소인 육계를 완벽하게 갖추어야만 해. 어머니에게서 받은 살과 피부와 피, 그리고 아버지에게서 받은 뼈와 골수와 정액이 완벽한 조화를 이룬 몸이어야 하지. 이것은 마치 우주 공간을 뚫고 나갈 최첨단 로켓을 만들 때 탑재되는 완벽한 부품들과 같아서, 어느 하나라도 빠지면 거대한 에너지를 감당할 수 없어.</text:span><text:span/></text:p>
      <text:p text:style-name="P150"><text:span text:style-name="T860">🌍 남섬부주라는 특별한 수행의 무대</text:span><text:span/></text:p>
      <text:p text:style-name="P151"><text:span text:style-name="T861">우리가 살고 있는 이 세계인 남섬부주의 태생 인간만이 이 특별한 육계를 온전히 지니고 태어나. 이곳은 기쁨과 괴로움이 교차하는 역동적인 공간이라서 의식을 미세하게 집중시키기에 가장 최적화된 환경을 제공해. 아주 정밀한 실험을 성공시키기 위해서 특수한 압력과 온도가 유지되는 실험실이 필요한 것처럼, 남섬부주의 인간 몸은 성불이라는 궁극의 변화를 만들어내기 위한 최고의 무대인 셈이야.</text:span><text:span/></text:p>
      <text:p text:style-name="P152"><text:span text:style-name="T862">🔑 수행의 출발점이 되는 신체적 조건</text:span><text:span/></text:p>
      <text:p text:style-name="P153"><text:span text:style-name="T863">결국 무상유가 밀교의 깊은 수행을 시작하여 단번에 깨달음을 얻으려면 이 육계를 구비한 인간의 몸이 필수적인 전제 조건이 돼. 육체라는 단단한 기반이 있어야만 그 내부에 흐르는 미세한 에너지와 마음을 자유자재로 움직일 수 있거든. 이 몸을 단순한 껍데기가 아니라 깨달음을 향해 나아가는 가장 고귀한 도구이자 탈것으로 바라보는 관점의 전환이 중요해.</text:span><text:span/></text:p>
      <text:p text:style-name="P154"><text:span text:style-name="T864">📝 핵심 요약</text:span><text:span/></text:p>
      <text:list text:style-name="WWNum17" text:continue-numbering="true">
        <text:list-item>
          <text:p text:style-name="P155"><text:span text:style-name="T865">무상유가 밀교는 수명이 짧은 탁세에서도 한 생 만에 성불할 수 있는 지름길을 제공한다.</text:span><text:span/></text:p>
        </text:list-item>
        <text:list-item>
          <text:p text:style-name="P156"><text:span text:style-name="T866">단기 성불을 성취하기 위해서는 부모로부터 받은 여섯 가지 원소인 육계가 몸에 온전히 갖추어져야 한다.</text:span><text:span/></text:p>
        </text:list-item>
        <text:list-item>
          <text:p text:style-name="P157"><text:span text:style-name="T867">우리가 사는 남섬부주의 태생 인간만이 이러한 신체적 조건을 완벽하게 구족하고 있다.</text:span><text:span/></text:p>
        </text:list-item>
        <text:list-item>
          <text:p text:style-name="P158"><text:span text:style-name="T868">완벽하게 설계된 인간의 몸은 미세 의식을 제어하고 깨달음을 성취하는 데 필수적인 도구이다.</text:span><text:span/></text:p>
        </text:list-item>
      </text:list>
      <text:p text:style-name="P159"><text:span><text:soft-page-break/></text:span><text:span/></text:p>
      <text:p text:style-name="P160"><text:span text:style-name="T869">[🟢 Online Mode | 26.06.01_12:08:20]</text:span><text:span/></text:p>
      <text:p text:style-name="P161"><text:span text:style-name="T870">8. 우리 몸속에 흐르는 신비로운 에너지 고속도로</text:span><text:span/></text:p>
      <text:p text:style-name="P162"><text:span text:style-name="T871">🔑 핵심 키워드: 근본삼맥, 아와두띠, 랄라나, 라싸나, 맥도 네트워크</text:span><text:span/></text:p>
      <text:p text:style-name="P163"><text:span text:style-name="T872">🗺️ 인간 신체에 숨겨진 비밀 지도</text:span><text:span/></text:p>
      <text:p text:style-name="P164"><text:span text:style-name="T873">우리가 살고 있는 이 세계의 인간 몸은 단순히 눈에 보이는 살과 뼈로만 이루어진 게 아니야. 눈에 보이지 않지만 생명 에너지가 유기적으로 흐르는 정교한 지도 같은 시스템이 우리 내면에 설계되어 있지. 이것은 도시 전체에 전력을 안정적으로 공급하기 위해 땅 밑과 건물 벽 속에 촘촘하게 매설해 둔 거대한 전기 배선망과 아주 비슷해.</text:span><text:span/></text:p>
      <text:p text:style-name="P165"><text:span text:style-name="T874">🛣️ 중심을 관통하는 거대한 메인 전선</text:span><text:span/></text:p>
      <text:p text:style-name="P166"><text:span text:style-name="T875">우리 몸의 한가운데에는 등골뼈를 따라 위아래로 길게 뻗어 있는 중심 에너지 도로인 아와두띠가 존재해. 전력망으로 치면 발전소에서 도심 한복판으로 가장 먼저 전기를 보내주는 거대한 초고압 송전선로라고 볼 수 있지. 이 중심 축이 흔들림 없이 단단하게 서 있어야 전체 에너지 흐름이 왜곡되지 않고 곧게 유지될 수 있어.</text:span><text:span/></text:p>
      <text:p text:style-name="P167"><text:span text:style-name="T876">⚖️ 좌우의 균형을 조율하는 간선도로</text:span><text:span/></text:p>
      <text:p text:style-name="P168"><text:span text:style-name="T877">이 중심 도로의 왼쪽과 오른쪽에는 각각 랄라나와 라싸나라는 큰 에너지 길이 나란히 달리고 있어. 마치 메인 고속도로 좌우로 평행하게 뻗은 주요 국도들처럼, 중심 도로의 에너지가 한쪽으로 치우치지 않도록 음과 양의 균형을 실시간으로 맞춰주는 역할을 해. 이 세 개의 줄기가 우리 몸의 생명력을 지탱하는 가장 뿌리 깊은 근본삼맥이야.</text:span><text:span/></text:p>
      <text:p text:style-name="P169"><text:span text:style-name="T878">🕸️ 온몸 구석구석 연결된 모세혈관 네트워크</text:span><text:span/></text:p>
      <text:p text:style-name="P170"><text:span text:style-name="T879">이 세 개의 거대한 뿌리 도로망으로부터 갈라져 나온 에너지는 무려 72,000가지의 수많은 작은 길들을 통해 온몸 구석구석으로 퍼져나가. 대도시의 간선도로에서 갈라져 나와 좁은 골목길을 거쳐 각 가정집 안방까지 연결되는 실핏줄 같은 도로망이지. 이 촘촘한 맥도 덕분에 우리는 손가락 끝과 발가락 끝 하나까지 에너지를 전달받아 살아 움직일 수 있는 거야.</text:span><text:span/></text:p>
      <text:p text:style-name="P171"><text:span text:style-name="T880">📝 핵심 요약</text:span><text:span/></text:p>
      <text:list text:style-name="WWNum18" text:continue-numbering="true">
        <text:list-item>
          <text:p text:style-name="P172"><text:span text:style-name="T881">인간의 몸에는 눈에 보이지 않는 정교한 에너지 배선망이 깔려 있음.</text:span><text:span/></text:p>
        </text:list-item>
        <text:list-item>
          <text:p text:style-name="P173"><text:span text:style-name="T882">척추를 중심축으로 하는 아와두띠, 랄라나, 라싸나가 가장 핵심적인 근본삼맥임.</text:span><text:span/></text:p>
        </text:list-item>
        <text:list-item>
          <text:p text:style-name="P174"><text:span text:style-name="T883">이 근본삼맥에서 파생된 72,000개의 작은 맥도들이 온몸 구석구석까지 생명력을 전달함.</text:span><text:span/></text:p>
        </text:list-item>
        <text:list-item>
          <text:p text:style-name="P175"><text:span text:style-name="T884">대도시의 송전탑과 골목길 네트워크처럼 촘촘한 균형을 이루며 신체를 유지함.</text:span><text:span/></text:p>
        </text:list-item>
      </text:list>
      <text:p text:style-name="P176"><text:span><text:soft-page-break/></text:span><text:span/></text:p>
      <text:p text:style-name="P177"><text:span text:style-name="T885">9. 거대한 에너지의 통합과 중심 맥도로의 몰입</text:span><text:span/></text:p>
      <text:p text:style-name="P178"><text:span text:style-name="T886">🔑 핵심 키워드: 임종, 맥도, 생명의 바람, 아와두띠</text:span><text:span/></text:p>
      <text:p text:style-name="P179"><text:span text:style-name="T887">💀 죽음의 시작과 기류의 이동</text:span><text:span/></text:p>
      <text:p text:style-name="P180"><text:span text:style-name="T888">죽음이 찾아오면 우리 몸을 분주하게 돌던 에너지가 거대한 변화를 시작해. 몸속에 퍼져 있던 수만 개의 미세한 통로들이 서서히 닫히면서 에너지가 한곳으로 모이기 시작하는 거지. 마치 퇴근 시간이 되면 사방으로 흩어져 있던 자동차들이 거대한 대로를 향해 서서히 몰려드는 것과 같아. 이 과정은 단순한 소멸이 아니라 의식을 가장 순수한 상태로 모으기 위한 첫 번째 준비 단계야.</text:span><text:span/></text:p>
      <text:p text:style-name="P181"><text:span text:style-name="T889">🌬️ 두 개의 강줄기로 모이는 에너지</text:span><text:span/></text:p>
      <text:p text:style-name="P182"><text:span text:style-name="T890">우리 몸에는 무려 7만 2천 개나 되는 미세한 에너지 통로가 존재해. 임종의 순간이 오면 이 수많은 통로 속을 흐르던 모든 생명의 바람들이 단 두 개의 큰 줄기인 좌우 맥도로 일제히 모여들게 돼. 동네의 작은 실개천들이 모두 힘을 합쳐서 결국 왼쪽과 오른쪽을 흐르는 두 개의 커다란 강줄기로 합쳐지는 현상과 똑같아. 이렇게 에너지가 압축되면서 의식은 더욱 강력하고 집중된 상태로 변하게 되지.</text:span><text:span/></text:p>
      <text:p text:style-name="P183"><text:span text:style-name="T891">💡 중앙 맥도 아와두띠로의 최종 융합</text:span><text:span/></text:p>
      <text:p text:style-name="P184"><text:span text:style-name="T892">좌우 맥도로 모인 강력한 생명의 바람들은 여기서 멈추지 않고 마침내 우리 몸의 정중앙을 관통하는 핵심 통로인 아와두띠로 완전히 들어가서 소멸해. 두 개의 큰 강줄기가 마침내 하나의 거대한 중앙 파이프라인 안으로 쏙 빨려 들어가는 장관이 펼쳐지는 셈이야. 이 중앙 맥도는 모든 분별과 망상이 사라지고 가장 본질적인 상태가 드러나는 유일한 통로이기도 해.</text:span><text:span/></text:p>
      <text:p text:style-name="P185"><text:span text:style-name="T893">🧘 깨달음으로 향하는 에너지의 완성</text:span><text:span/></text:p>
      <text:p text:style-name="P186"><text:span text:style-name="T894">에너지가 중앙 맥도로 완전히 흡수되는 이 순간이야말로 밀교에서 말하는 성불의 핵심 타이밍이야. 모든 거친 에너지와 생각들이 사라지고 가장 미세한 빛만이 남게 되는데, 이 기회를 통해 평범한 죽음을 위대한 깨달음의 기회로 전환할 수 있어. 마치 복잡한 밤하늘의 구름이 완전히 걷히고 마침내 밝은 보름달이 모습을 드러내는 것처럼 궁극의 청정 지혜를 마주할 준비가 끝나는 거지.</text:span><text:span/></text:p>
      <text:p text:style-name="P187"><text:span text:style-name="T895">📝 핵심 요약</text:span><text:span/></text:p>
      <text:list text:style-name="WWNum19" text:continue-numbering="true">
        <text:list-item>
          <text:p text:style-name="P188"><text:span text:style-name="T896">죽음이 시작되면 몸속의 7만 2천 개 에너지 통로가 변화를 일으킴</text:span><text:span/></text:p>
        </text:list-item>
        <text:list-item>
          <text:p text:style-name="P189"><text:span text:style-name="T897">모든 생명의 바람이 좌우 두 개의 맥도로 먼저 집중됨</text:span><text:span/></text:p>
        </text:list-item>
        <text:list-item>
          <text:p text:style-name="P190"><text:span text:style-name="T898">집중된 에너지가 최종적으로 중앙 맥도인 아와두띠로 흡수되며 소멸함</text:span><text:span/></text:p>
        </text:list-item>
        <text:list-item>
          <text:p text:style-name="P191"><text:span text:style-name="T899">이 과정은 분별심을 깨고 궁극의 불성을 드러내어 성불로 나아가는 핵심 원리임</text:span><text:span/></text:p>
        </text:list-item>
      </text:list>
      <text:p text:style-name="P192"><text:span><text:soft-page-break/></text:span><text:span/></text:p>
      <text:p text:style-name="P193"><text:span text:style-name="T900">10. 중맥의 바람이 심장으로 모이는 임종의 비밀</text:span><text:span/></text:p>
      <text:p text:style-name="P194"><text:span text:style-name="T901">🔑 핵심 키워드: 아와두띠, 심장 짜끄라, 불괴명점, 풍심, 지명풍</text:span><text:span/></text:p>
      <text:p text:style-name="P195"><text:span text:style-name="T902">🌪️ 상하의 바람이 심장으로 모이는 순간</text:span><text:span/></text:p>
      <text:p text:style-name="P196"><text:span text:style-name="T903">우리 몸의 중심을 흐르는 에너지 통로인 아와두띠에는 위아래로 흐르는 생명의 바람들이 있어. 임종의 순간이 찾아오면 이 바람들이 사방에서 중앙으로 모여들기 시작해. 이것은 마치 전국의 모든 고속도로가 하나의 거대한 중앙 터미널을 향해 일제히 수렴하는 것과 같지. 심장 짜끄라라는 특별한 정거장으로 모든 에너지가 집중되면서 외적인 호흡과 활동이 서서히 멈추는 준비를 하게 돼.</text:span><text:span/></text:p>
      <text:p text:style-name="P197"><text:span text:style-name="T904">🏺 하얀 보리심과 붉은 보리심의 만남</text:span><text:span/></text:p>
      <text:p text:style-name="P198"><text:span text:style-name="T905">심장 중심에는 아버지가 물려준 하얀 에너지와 어머니가 물려준 붉은 에너지가 서로 마주 보고 있어. 불교에서는 이를 하얀 보리심과 붉은 보리심이라고 부르는데, 두 에너지가 마치 작은 종지 두 개를 위아래로 딱 맞물려 놓은 항아리 같은 형태로 존재해. 이 결합된 공간은 우리 생명의 가장 깊은 거점이자, 진정한 지혜와 기쁨을 피워내는 비밀스러운 보물상자와 같단다.</text:span><text:span/></text:p>
      <text:p text:style-name="P199"><text:span text:style-name="T906">🕯️ 가장 깊은 곳의 미세한 마음과 에너지</text:span><text:span/></text:p>
      <text:p text:style-name="P200"><text:span text:style-name="T907">마주 보며 맞물려 있는 보물상자 바로 한가운데에는 더 이상 쪼갤 수 없는 극도로 미세한 에너지가 숨어있어. 이를 풍심이라고 부르는데, 움직이는 에너지인 바람과 아는 성품인 마음이 완전히 하나로 융합된 상태를 말해. 이것은 전구에 불이 들어올 때 전류와 빛을 따로 분리할 수 없는 것처럼, 영혼의 가장 순수하고 본질적인 알맹이라고 생각하면 이해하기 쉬워.</text:span><text:span/></text:p>
      <text:p text:style-name="P201"><text:span text:style-name="T908">🌊 불멸의 생명풍 속으로 사라지는 임종</text:span><text:span/></text:p>
      <text:p text:style-name="P202"><text:span text:style-name="T909">마지막 순간이 되면 이 미세한 풍심이 절대 파괴되지 않는 불멸의 지명풍 속으로 깊숙이 흡수되어 소멸해. 모든 에너지가 본래의 고요한 근원으로 완전히 되돌아가는 완전한 합일의 순간이지. 강물이 흘러 마침내 거대한 바다 품에 안기며 하나가 되는 것처럼, 이 마지막 소멸의 과정을 거치면서 인간은 비로소 일생을 마감하고 임종의 단계에 도달하게 되는 거야.</text:span><text:span/></text:p>
      <text:p text:style-name="P203"><text:span text:style-name="T910">📝 핵심 요약</text:span><text:span/></text:p>
      <text:list text:style-name="WWNum20" text:continue-numbering="true">
        <text:list-item>
          <text:p text:style-name="P204"><text:span text:style-name="T911">임종 시 아와두띠의 상하부 생명 바람들이 심장 짜끄라로 모여든다.</text:span><text:span/></text:p>
        </text:list-item>
        <text:list-item>
          <text:p text:style-name="P205"><text:span text:style-name="T912">심장 중앙에서 하얀 보리심과 붉은 보리심이 종지 모양으로 맞물려 생명의 거점을 이룬다.</text:span><text:span/></text:p>
        </text:list-item>
        <text:list-item>
          <text:p text:style-name="P206"><text:span text:style-name="T913">그 중앙에는 바람과 마음이 하나가 된 극도로 미세한 풍심이 존재한다.</text:span><text:span/></text:p>
        </text:list-item>
        <text:list-item>
          <text:p text:style-name="P207"><text:span text:style-name="T914">풍심이 불멸의 지명풍 속으로 들어가 소멸하면서 최종적인 임종을 맞이한다.</text:span><text:span/></text:p>
        </text:list-item>
      </text:list>
      <text:p text:style-name="P208"><text:span><text:soft-page-break/></text:span><text:span/></text:p>
      <text:p text:style-name="P209"><text:span text:style-name="T915">[🟢 Online Mode | 26.06.01_12:13:53]</text:span><text:span/></text:p>
      <text:p text:style-name="P210"><text:span text:style-name="T916">11. 의식을 떠받치는 미세한 생명의 바람과 죽음의 조건</text:span><text:span/></text:p>
      <text:p text:style-name="P211"><text:span text:style-name="T917">🔑 핵심 키워드: 극도로 미세한 생명의 바람, 의식의 의지처, 죽음의 메커니즘, 신체 잔류 에너지</text:span><text:span/></text:p>
      <text:p text:style-name="P212"><text:span text:style-name="T918">🌬️ 의식을 깨우는 보이지 않는 바람</text:span><text:span/></text:p>
      <text:p text:style-name="P213"><text:span text:style-name="T919">우리 몸 안에는 의식을 지탱하고 움직이게 만드는 미세한 생명의 바람이 흐르고 있어. 불교 명상학에서는 이 바람을 의식이 타고 다니는 말이나 차량 같은 존재로 바라보지. 아무리 맑고 영리한 운전자가 있어도 차에 시동이 걸리지 않거나 연료가 전혀 없으면 움직일 수 없는 것처럼, 이 바람이 있어야만 우리의 마음과 의식이 몸이라는 공간 안에서 제 기능을 발휘할 수 있게 돼.</text:span><text:span/></text:p>
      <text:p text:style-name="P214"><text:span text:style-name="T920">🔌 전자기기의 대기 전력과 생명의 불꽃</text:span><text:span/></text:p>
      <text:p text:style-name="P215"><text:span text:style-name="T921">텍스트에서 말하는 극도로 미세한 바람은 일종의 스마트폰 대기 전력과 같다고 보면 이해하기 쉬워. 화면도 꺼져 있고 아무런 소리도 나지 않지만, 기기 내부에서는 전원이 완전히 차단되지 않고 최소한의 전류가 흐르고 있는 상태지. 우리 몸도 겉보기에는 숨이 멎고 심장이 뛴 것 같아 보여도, 이 최소한의 미세한 에너지 바람이 아주 조금이라도 남아 있다면 생명 활동이 완전히 종료된 것이 아니야.</text:span><text:span/></text:p>
      <text:p text:style-name="P216"><text:span text:style-name="T922">🚪 거친 바람이 떠나야 열리는 죽음의 문</text:span><text:span/></text:p>
      <text:p text:style-name="P217"><text:span text:style-name="T923">의식의 의지처가 되는 거친 생명의 바람들이 몸의 단 한 구석에라도 남아 있다면 죽음은 결코 일어나지 않아. 커다란 배를 항구에 단단히 묶어둔 여러 가닥의 밧줄 중 단 하나만 제대로 남아 있어도 배가 바다로 떠내려가지 않는 것과 같은 원리야. 모든 일상적인 감각과 거친 호흡의 바람들이 완전히 사라지고, 오직 가장 깊은 곳의 미세한 바람만이 남았을 때 비로소 진정한 임종의 과정이 시작되는 거지.</text:span><text:span/></text:p>
      <text:p text:style-name="P218"><text:span text:style-name="T924">🕯️ 마지막 불꽃이 꺼지는 순간</text:span><text:span/></text:p>
      <text:p text:style-name="P219"><text:span text:style-name="T925">결국 죽음이라는 현상은 이 마지막 대기 전력마저 완전히 차단되어 의식이 몸과의 연결을 완전히 끊고 떠날 때 비로소 완성돼. 방 안의 불을 다 꿨어도 전원 플러그를 뽑지 않으면 기기에 미세한 불빛이 남아 있는 것처럼, 그 마지막 연결고리까지 사라져야 영혼은 다음 여정으로 나아갈 수 있어. 이 미세한 바람의 소멸과 의식의 분리 과정을 이해하는 것이 불교에서 죽음을 명상하고 준비하는 핵심 이유야.</text:span><text:span/></text:p>
      <text:p text:style-name="P220"><text:span text:style-name="T926">📝 핵심 요약</text:span><text:span/></text:p>
      <text:list text:style-name="WWNum21" text:continue-numbering="true">
        <text:list-item>
          <text:p text:style-name="P221"><text:span text:style-name="T927">미세한 생명의 바람은 우리 의식이 몸 안에서 활동할 수 있도록 떠받치는 근본적인 의지처야.</text:span><text:span/></text:p>
        </text:list-item>
        <text:list-item>
          <text:p text:style-name="P222"><text:span text:style-name="T928">겉으로 숨이 멈추어도 의식을 지탱하는 거친 바람들이 조금이라도 남아 있다면 죽음은 성립되지 않아.</text:span><text:span/></text:p>
        </text:list-item>
        <text:list-item>
          <text:p text:style-name="P223"><text:span text:style-name="T929">이는 스마트폰의 대기 전력이나 배를 묶어둔 마지막 밧줄처럼 생명의 최소한의 연결고리 역할을 해.</text:span><text:span/></text:p>
        </text:list-item>
        <text:list-item>
          <text:p text:style-name="P224"><text:span text:style-name="T930">최종적으로 이 미세한 바람마저 사라지고 의식이 완전히 분리되어야 비로소 죽음의 과정이 완료돼.</text:span><text:span/></text:p>
        </text:list-item>
      </text:list>
      <text:p text:style-name="P225"><text:span><text:soft-page-break/></text:span><text:span/></text:p>
      <text:p text:style-name="P226"><text:span text:style-name="T931">12. 인체의 25가지 거친 원소의 해체와 죽음의 여정</text:span><text:span/></text:p>
      <text:p text:style-name="P227"><text:span text:style-name="T932">🔑 핵심 키워드: 오온, 사대, 육근, 오경, 오지, 거친 원소의 소멸</text:span><text:span/></text:p>
      <text:p text:style-name="P228"><text:span text:style-name="T933">🏗️ 거대한 건물의 전원이 꺼지는 과정</text:span><text:span/></text:p>
      <text:p text:style-name="P229"><text:span text:style-name="T934">죽음이라는 것은 한순간에 모든 것이 뚝 끊기는 단절이 아니라, 거대한 공장의 시스템들이 순서대로 안전하게 꺼지는 과정과 같아. 우리 몸을 구성하는 25가지의 거친 원소들이 하나씩 기능을 멈추고 흡수되면서 죽음이 일어나게 되지. 이 해체 과정은 우리가 매일 밤 잠자리에 들 때 의식이 서서히 흐려지는 것과 매우 흡사해. 몸과 마음의 가장 밑바닥에 있는 미세한 의식으로 돌아가기 위해, 겉을 싸고 있던 두꺼운 외투를 하나씩 벗는 단계라고 생각하면 이해하기 쉬울 </text:span><text:span text:style-name="T935">거야.</text:span><text:span/></text:p>
      <text:p text:style-name="P230"><text:span text:style-name="T936">🧩 나를 구성하던 물질과 정신의 정지</text:span><text:span/></text:p>
      <text:p text:style-name="P231"><text:span text:style-name="T937">가장 먼저 우리 존재의 바탕을 이루던 물질과 정신의 묶음인 오온, 그리고 몸의 물리적 기초인 사대가 힘을 잃기 시작해. 색온, 수온, 상온, 행온, 식온으로 이루어진 오온은 마치 컴퓨터의 하드웨어와 운영체제 같은 것이고, 땅, 물, 불, 바람의 사대는 건물을 지탱하는 기둥과 벽, 온수 파이프, 환풍기와 같지. 이 단단하고 견고해 보이던 신체적 기반과 감정의 흐름들이 통제력을 잃고 서로에게 녹아들며 거친 에너지가 소멸하기 시작하는 거야.</text:span><text:span/></text:p>
      <text:p text:style-name="P232"><text:span text:style-name="T938">🔌 세상과 소통하던 감각의 문이 닫힘</text:span><text:span/></text:p>
      <text:p text:style-name="P233"><text:span text:style-name="T939">그다음으로는 외부 세상과 우리를 연결해 주던 다섯 가지 감각기관인 육근과 그 대상인 오경이 서서히 작동을 멈추게 돼. 눈, 귀, 코, 혀, 몸, 뜻이라는 여섯 가지 안테나가 수신을 중단하고, 모양, 소리, 향기, 맛, 닿음이라는 주변의 풍경들이 화면에서 사라지는 거지. 이는 마치 밤이 깊어 상점들이 하나둘 간판 불을 끄고 문을 닫는 풍경과 같아. 세상과의 소통을 멈추고 온전히 내면의 세계로 침잠하는 준비를 하는 단계야.</text:span><text:span/></text:p>
      <text:p text:style-name="P234"><text:span text:style-name="T940">🕯️ 내면을 밝히던 다섯 가지 지혜의 소멸</text:span><text:span/></text:p>
      <text:p text:style-name="P235"><text:span text:style-name="T941">마지막으로 우리가 세상을 바르게 인식하고 활동하게 도와주던 본질적인 다섯 가지 지혜인 오지도 거친 수준에서 소멸 과정을 거쳐. 법계의 참모습을 아는 법계체성지, 거울처럼 비춰보는 대원경지, 평등함을 아는 평등성지, 구별해 내는 묘관찰지, 일을 성취하는 성소작지가 차례로 흐려지지. 밝게 켜져 있던 방 안의 스탠드 불빛들이 하나씩 꺼지며 가장 깊고 순수한 침묵의 공간으로 들어가는 마지막 관문이라고 볼 수 있어.</text:span><text:span/></text:p>
      <text:p text:style-name="P236"><text:span text:style-name="T942">📝 핵심 요약</text:span><text:span/></text:p>
      <text:list text:style-name="WWNum22" text:continue-numbering="true">
        <text:list-item>
          <text:p text:style-name="P237"><text:span text:style-name="T943">죽음은 인체를 구성하는 25가지 거친 원소들이 순차적으로 소멸하는 해체 과정이다.</text:span><text:span/></text:p>
        </text:list-item>
        <text:list-item>
          <text:p text:style-name="P238"><text:span text:style-name="T944">정신과 물질의 중심인 오온과 물리적 기반인 사대가 먼저 기능을 멈추고 흡수된다.</text:span><text:span/></text:p>
        </text:list-item>
        <text:list-item>
          <text:p text:style-name="P239"><text:span text:style-name="T945">외부 세상을 인식하던 감각기관인 육근과 대상인 오경의 문이 닫히며 내면으로 집중된다.</text:span><text:span/></text:p>
        </text:list-item>
        <text:list-item>
          <text:p text:style-name="P240"><text:span text:style-name="T946">법계체성지를 비롯한 다섯 가지 기본 지혜가 소멸하며 가장 미세한 의식의 상태로 나아간다.</text:span><text:span/></text:p>
        </text:list-item>
      </text:list>
      <text:p text:style-name="P241"><text:span><text:soft-page-break/></text:span><text:span/></text:p>
      <text:p text:style-name="P242"><text:span text:style-name="T947">[🔴 Offline Mode | 26.06.01_12:14:11]</text:span><text:span/></text:p>
      <text:p text:style-name="P243"><text:span text:style-name="T948">13. 물질의 소멸과 육체의 은멸 징후</text:span><text:span/></text:p>
      <text:p text:style-name="P244"><text:span text:style-name="T949">🔑 핵심 키워드: 색온, 거울 지혜, 땅 원소, 눈 감관, 은멸 현상</text:span><text:span/></text:p>
      <text:p text:style-name="P245"><text:span text:style-name="T950">🗿 다섯 가지 물질 원소의 동시 소멸</text:span><text:span/></text:p>
      <text:p text:style-name="P246"><text:span text:style-name="T951">우리 몸을 구성하는 가장 단단하고 기초적인 바탕이 무너지기 시작할 때, 색온이라는 물질의 거대한 묶음에 속한 다섯 가지 핵심 요소가 한꺼번에 힘을 잃고 사라지게 돼. 이것은 마치 거대한 건물을 지탱하던 다섯 개의 주요 기둥이 거센 지진을 만나 동시에 와르르 무너져 내리는 과정과 똑같아. 우리 존재를 유지하던 물질적 차원의 단단한 질서들이 서로 긴밀하게 연결되어 있다가, 종말의 순간에 이르러 약속이라도 한 듯 일제히 그 기능을 멈추고 깊은 어둠 속으로 가라</text:span><text:span text:style-name="T952">앉는 첫 번째 단계이지.</text:span><text:span/></text:p>
      <text:p text:style-name="P247"><text:span text:style-name="T953">🪞 마음에 귀속된 감각과 지혜의 은멸</text:span><text:span/></text:p>
      <text:p text:style-name="P248"><text:span text:style-name="T954">이 소멸의 소용돌이 속에는 단순히 눈에 보이는 육체뿐만 아니라, 사물을 있는 그대로 투명하게 비춰보던 거울 같은 지혜와 시각을 담당하던 눈의 감관, 그리고 마음에 귀속되어 있던 내밀한 빛과 색들이 모두 포함되어 있어. 평소에는 세상을 맑게 관찰하던 거울에 뿌연 안개가 자욱하게 끼면서 마침내 거울 자체가 빛을 잃고 투명함을 상실하는 상태가 되는 거야. 내면의 감각 시스템이 외부 세계와 연결망을 끊고 중심부로 수축하면서, 영혼이 머물던 물질적 방의 불이 하나</text:span><text:span text:style-name="T955">씩 꺼지는 것과 같은 고요한 소멸이 일어나게 돼.</text:span><text:span/></text:p>
      <text:p text:style-name="P249"><text:span text:style-name="T956">📉 육체가 무너지며 나타나는 외적 현상</text:span><text:span/></text:p>
      <text:p text:style-name="P250"><text:span text:style-name="T957">이렇게 단단한 땅의 성질과 물질의 쌓임이 안에서부터 녹아내리기 시작하면, 눈에 보이는 육체 외부에서도 아주 뚜렷하고 슬픈 변화들이 관찰되기 시작해. 가장 먼저 팔과 다리를 비롯한 몸의 여러 지분들이 예전과 비교할 수 없을 정도로 눈에 띄게 가늘어지고 줄어들게 되지. 마치 사막의 뜨거운 태양 아래에서 물이 전부 증발해 버려 바싹 말라가는 여린 나뭇가지처럼, 육체의 부피 자체가 급격하게 축소되는 현상을 눈으로 확인하게 되는 거야.</text:span><text:span/></text:p>
      <text:p text:style-name="P251"><text:span text:style-name="T958">🌊 근력 상실과 쇠잔해지는 생명력</text:span><text:span/></text:p>
      <text:p text:style-name="P252"><text:span text:style-name="T959">동시에 몸의 온전한 형태를 유지하던 근본적인 힘이 완전히 사라지면서 온몸이 급격하게 쇠잔해지고 손가락 하나 까딱할 수 없을 정도로 근력이 완전히 바닥나게 돼. 든든하게 대지를 받치고 있던 거대한 흙더미가 거센 폭우에 쓸려 내려가 진흙탕처럼 허물어지는 것처럼, 육체는 무력감 속에서 완전히 기능을 상실하게 되지. 안에서 일어난 다섯 원소의 소멸이 결국 겉으로 드러나는 신체의 완전한 붕괴와 무력화라는 결과로 고스란히 이어지는 셈이야.</text:span><text:span/></text:p>
      <text:p text:style-name="P253"><text:span text:style-name="T960">📝 핵심 요약</text:span><text:span/></text:p>
      <text:list text:style-name="WWNum23" text:continue-numbering="true">
        <text:list-item>
          <text:p text:style-name="P254"><text:span text:style-name="T961">우리 육체를 지탱하는 색온 부류의 다섯 가지 원소가 종말의 순간에 동시에 소멸함.</text:span><text:span/></text:p>
        </text:list-item>
        <text:list-item>
          <text:p text:style-name="P255"><text:span text:style-name="T962">거울 같은 지혜, 땅 원소, 눈 감관, 내밀한 색들이 외부 연결을 끊고 일제히 은멸함.</text:span><text:span/></text:p>
        </text:list-item>
        <text:list-item>
          <text:p text:style-name="P256"><text:span text:style-name="T963">물질이 소멸하는 첫 외적 징후로 팔다리를 비롯한 몸의 지분들이 눈에 띄게 줄어듦.</text:span><text:span/></text:p>
        </text:list-item>
        <text:list-item>
          <text:p text:style-name="P257"><text:span text:style-name="T964">육체가 급격히 쇠잔해지며 대지가 허물어지듯 몸을 움직일 수 있는 모든 근력을 상실함.</text:span><text:span/></text:p>
        </text:list-item>
      </text:list>
      <text:p text:style-name="P258"><text:span><text:soft-page-break/></text:span><text:span/></text:p>
      <text:p text:style-name="P259"><text:span text:style-name="T965">14. 대원경지의 해체와 흐려지는 시야</text:span><text:span/></text:p>
      <text:p text:style-name="P260"><text:span text:style-name="T966">🔑 핵심 키워드: 대원경지, 거울의 지혜, 동시 지각, 시각 소멸</text:span><text:span/></text:p>
      <text:p text:style-name="P261"><text:span text:style-name="T967">🪞 모든 것을 비추는 마음의 거울</text:span><text:span/></text:p>
      <text:p text:style-name="P262"><text:span text:style-name="T968">기본의 대원경지란 방 안의 모든 물건을 왜곡 없이 한 번에 보여주는 커다란 거울처럼, 바깥의 수많은 사물을 일시에 명확하게 인식하는 마음의 본질적인 능력을 의미해. 어떤 편견이나 집착도 없이 눈앞의 세상을 있는 그대로 투명하게 비추는 맑은 호수 같은 상태지. 우리가 세상을 넓고 선명하게 바라볼 수 있는 것은 바로 이 내면의 거울이 작동하고 있기 때문이야.</text:span><text:span/></text:p>
      <text:p text:style-name="P263"><text:span text:style-name="T969">📸 한 번에 담아내는 고화질 카메라</text:span><text:span/></text:p>
      <text:p text:style-name="P264"><text:span text:style-name="T970">이 지혜는 일상생활에서 우리가 복잡한 풍경을 단 한 번의 눈길로 모두 포착할 수 있게 도와줘. 길을 걸을 때 표지판, 지나가는 사람, 하늘의 구름, 주변의 건물들을 일일이 계산하지 않고도 동시에 알아차리는 고성능 파노라마 카메라와 같은 역할을 하는 셈이지. 사물을 하나하나 쪼개서 보지 않고 전체를 통으로 선명하게 인지하는 근원적인 힘이야.</text:span><text:span/></text:p>
      <text:p text:style-name="P265"><text:span text:style-name="T971">🌫️ 거울에 김이 서리듯 흐려지는 시야</text:span><text:span/></text:p>
      <text:p text:style-name="P266"><text:span text:style-name="T972">죽음의 과정에서 이 대원경지의 에너지가 서서히 소멸하기 시작하면, 그 외적인 징후가 육체의 눈을 통해 가장 먼저 나타나게 돼. 맑았던 거울에 뜨거운 김이 뿌옇게 서리는 것처럼, 눈의 초점이 풀리고 사물이 흐릿하게 보이기 시작하지. 형태를 한 번에 인지하던 마음의 거울 기능이 멈추면서 세상과의 시각적 연결이 끊어지는 첫 번째 신호라고 볼 수 있어.</text:span><text:span/></text:p>
      <text:p text:style-name="P267"><text:span text:style-name="T973">📊 감각의 전원이 꺼지는 인지적 변화</text:span><text:span/></text:p>
      <text:p text:style-name="P268"><text:span text:style-name="T974">이 현상은 단순한 안구의 시력 저하가 아니라, 의식이 물질 세계를 지각하는 근본적인 전원이 차단되는 과정이야. 내면의 맑은 거울이 기능을 다하면서 일어나는 인지적 변화를 정리하면 다음과 같아.</text:span><text:span/></text:p>
      <table:table table:style-name="ta2">
        <table:table-columns>
          <table:table-column table:style-name="co4"/>
          <table:table-column table:style-name="co5"/>
          <table:table-column table:style-name="co6"/>
        </table:table-columns>
        <table:table-row table:style-name="ro4" table:default-cell-style-name="ce11">
          <table:table-cell table:style-name="ce12">
            <text:p text:style-name="P269"><text:span text:style-name="T975">구분</text:span><text:span/></text:p>
          </table:table-cell>
          <table:table-cell table:style-name="ce13">
            <text:p text:style-name="P270"><text:span text:style-name="T976">대원경지 활성화 상태</text:span><text:span/></text:p>
          </table:table-cell>
          <table:table-cell table:style-name="ce14">
            <text:p text:style-name="P271"><text:span text:style-name="T977">대원경지 소멸 단계 (외적 현상)</text:span><text:span/></text:p>
          </table:table-cell>
        </table:table-row>
        <table:table-row table:style-name="ro5" table:default-cell-style-name="ce11">
          <table:table-cell table:style-name="ce15">
            <text:p text:style-name="P272"><text:span text:style-name="T978">지각 방식</text:span><text:span/></text:p>
          </table:table-cell>
          <table:table-cell table:style-name="ce16">
            <text:p text:style-name="P273"><text:span text:style-name="T979">외부 사물을 일시에 분명하게 지각함</text:span><text:span/></text:p>
          </table:table-cell>
          <table:table-cell table:style-name="ce17">
            <text:p text:style-name="P274"><text:span text:style-name="T980">사물의 형태를 인지하지 못하고 방황함</text:span><text:span/></text:p>
          </table:table-cell>
        </table:table-row>
        <table:table-row table:style-name="ro6" table:default-cell-style-name="ce11">
          <table:table-cell table:style-name="ce18">
            <text:p text:style-name="P275"><text:span text:style-name="T981">시각 상태</text:span><text:span/></text:p>
          </table:table-cell>
          <table:table-cell table:style-name="ce19">
            <text:p text:style-name="P276"><text:span text:style-name="T982">초점이 명확하고 시야가 넓음</text:span><text:span/></text:p>
          </table:table-cell>
          <table:table-cell table:style-name="ce20">
            <text:p text:style-name="P277"><text:span text:style-name="T983">눈의 초점이 완전히 풀리고 흐릿해짐</text:span><text:span/></text:p>
          </table:table-cell>
        </table:table-row>
      </table:table>
      <text:p text:style-name="P278"><text:span text:style-name="T984">📝 핵심 요약</text:span><text:span/></text:p>
      <text:list text:style-name="WWNum24" text:continue-numbering="true">
        <text:list-item>
          <text:p text:style-name="P279"><text:span text:style-name="T985">대원경지는 거울이 사물을 비추듯 온갖 세상을 일시에 명확하게 지각하는 내면의 청정한 능력이야.</text:span><text:span/></text:p>
        </text:list-item>
        <text:list-item>
          <text:p text:style-name="P280"><text:span text:style-name="T986">일상에서는 고화질 카메라처럼 복잡한 풍경을 단번에 담아내는 동시 지각의 힘으로 작용해.</text:span><text:span/></text:p>
        </text:list-item>
        <text:list-item>
          <text:p text:style-name="P281"><text:span text:style-name="T987">죽음의 순간에 이 지혜가 소멸하면 맑은 거울에 김이 서리듯 눈의 초점이 풀리는 외적 징후가 나타나.</text:span><text:span/></text:p>
        </text:list-item>
        <text:list-item>
          <text:p text:style-name="P282"><text:span text:style-name="T988">이는 시각적 인지 능력이 해체되면서 물질 세계와의 연결이 부드럽게 마감되는 자연스러운 과정이야.</text:span><text:span/></text:p>
        </text:list-item>
      </text:list>
      <text:p text:style-name="P283"><text:span><text:soft-page-break/></text:span><text:span/></text:p>
      <text:p text:style-name="P284"><text:span text:style-name="T989">[🟢 Online Mode | 26.06.01_12:14:25]</text:span><text:span/></text:p>
      <text:p text:style-name="P285"><text:span text:style-name="T990">15. 땅 원소의 해체와 육체의 변화</text:span><text:span/></text:p>
      <text:p text:style-name="P286"><text:span text:style-name="T991">🔑 핵심 키워드: 땅 원소 소멸, 신체 건조, 사지 이완, 침강 감각</text:span><text:span/></text:p>
      <text:p text:style-name="P287"><text:span text:style-name="T992">🏔️ 단단한 버팀목의 붕괴</text:span><text:span/></text:p>
      <text:p text:style-name="P288"><text:span text:style-name="T993">우리 몸을 안전하게 지탱하던 가장 견고한 에너지가 서서히 사라지는 단계야. 비유하자면 거대한 건물을 든든하게 받치고 있던 중심 기둥이 서서히 모래처럼 부서져 내리는 물리적 변화와 흡사하지. 육체의 단단함을 유지하던 성질이 기반부터 무너지면서, 존재는 본격적인 해체의 길로 접어들게 돼.</text:span><text:span/></text:p>
      <text:p text:style-name="P289"><text:span text:style-name="T994">🏜️ 수분이 사라진 가뭄의 육체</text:span><text:span/></text:p>
      <text:list text:style-name="WWNum25" text:continue-numbering="true">
        <text:list-item>
          <text:p text:style-name="P290"><text:span text:style-name="T995">현상: 외적으로 몸이 급격하게 건조해지고 바짝 마르는 변화가 일어나.</text:span><text:span/></text:p>
        </text:list-item>
        <text:list-item>
          <text:p text:style-name="P291"><text:span text:style-name="T996">비유: 오랫동안 비가 내리지 않아 물기가 전부 증발하고 균열이 생기는 메마른 논바닥과 같아.</text:span><text:span/></text:p>
        </text:list-item>
        <text:list-item>
          <text:p text:style-name="P292"><text:span text:style-name="T997">의미: 수분과 영양이 고갈되면서 형체가 위축되고, 육체가 가진 물리적인 힘이 사라지는 신호지.</text:span><text:span/></text:p>
        </text:list-item>
      </text:list>
      <text:p text:style-name="P293"><text:span text:style-name="T998">🧵 줄이 끊어진 마리오네트</text:span><text:span/></text:p>
      <table:table table:style-name="ta3">
        <table:table-columns>
          <table:table-column table:style-name="co7"/>
          <table:table-column table:style-name="co8"/>
        </table:table-columns>
        <table:table-row table:style-name="ro7" table:default-cell-style-name="ce21">
          <table:table-cell table:style-name="ce22">
            <text:p text:style-name="P294"><text:span text:style-name="T999">구분</text:span><text:span/></text:p>
          </table:table-cell>
          <table:table-cell table:style-name="ce23">
            <text:p text:style-name="P295"><text:span text:style-name="T1000">신체적 상태와 변화 양상</text:span><text:span/></text:p>
          </table:table-cell>
        </table:table-row>
        <table:table-row table:style-name="ro8" table:default-cell-style-name="ce21">
          <table:table-cell table:style-name="ce24">
            <text:p text:style-name="P296"><text:span text:style-name="T1001">사지의 상태</text:span><text:span/></text:p>
          </table:table-cell>
          <table:table-cell table:style-name="ce25">
            <text:p text:style-name="P297"><text:span text:style-name="T1002">몸의 마디마디와 팔다리가 힘없이 스르륵 풀어짐</text:span><text:span/></text:p>
          </table:table-cell>
        </table:table-row>
        <table:table-row table:style-name="ro9" table:default-cell-style-name="ce21">
          <table:table-cell table:style-name="ce26">
            <text:p text:style-name="P298"><text:span text:style-name="T1003">직관적 비유</text:span><text:span/></text:p>
          </table:table-cell>
          <table:table-cell table:style-name="ce27">
            <text:p text:style-name="P299"><text:span text:style-name="T1004">조종 줄이 가위로 끊어져 무력하게 바닥으로 늘어진 인형의 모습</text:span><text:span/></text:p>
          </table:table-cell>
        </table:table-row>
        <table:table-row table:style-name="ro10" table:default-cell-style-name="ce21">
          <table:table-cell table:style-name="ce28">
            <text:p text:style-name="P300"><text:span text:style-name="T1005">조절력 상실</text:span><text:span/></text:p>
          </table:table-cell>
          <table:table-cell table:style-name="ce29">
            <text:p text:style-name="P301"><text:span text:style-name="T1006">근육과 신경이 결속력을 잃고 완전한 통제 불능 상태에 도달함</text:span><text:span/></text:p>
          </table:table-cell>
        </table:table-row>
      </table:table>
      <text:p text:style-name="P302"><text:span text:style-name="T1007">⚓ 늪으로 끌어당기는 중력의 압박</text:span><text:span/></text:p>
      <text:p text:style-name="P303"><text:span text:style-name="T1008">마지막으로 주관적인 의식 속에서는 온몸이 땅 밑으로 깊숙이 침강하는 독특한 감각을 경험하게 돼. 마치 발을 디딜 수 없는 거대한 늪지대나 끝이 없는 진흙탕 속으로 신체가 빨려 들어가는 기분이지. 지구의 모든 중력이 오직 나만을 향해 무겁게 쏟아져 내리는 듯한 압도적인 압박감을 느끼는 순간이야.</text:span><text:span/></text:p>
      <text:p text:style-name="P304"><text:span text:style-name="T1009">📝 핵심 요약</text:span><text:span/></text:p>
      <text:list text:style-name="WWNum25" text:continue-numbering="true">
        <text:list-item>
          <text:p text:style-name="P305"><text:span text:style-name="T1010">육체의 고체성과 견고함을 담당하던 땅 원소가 단단함을 잃고 해체되기 시작함.</text:span><text:span/></text:p>
        </text:list-item>
        <text:list-item>
          <text:p text:style-name="P306"><text:span text:style-name="T1011">신체 내부의 생명력이 빠져나가며 가뭄을 만난 논바닥처럼 육체가 급격히 건조해짐.</text:span><text:span/></text:p>
        </text:list-item>
        <text:list-item>
          <text:p text:style-name="P307"><text:span text:style-name="T1012">사지의 모든 결속력이 풀어지며 줄이 끊어진 인형처럼 통제력을 완전히 상실함.</text:span><text:span/></text:p>
        </text:list-item>
        <text:list-item>
          <text:p text:style-name="P308"><text:span text:style-name="T1013">의식적으로는 몸이 중력에 짓눌려 땅 밑이나 깊은 늪 속으로 가라앉는 듯한 침강 감각을 겪음.</text:span><text:span/></text:p>
        </text:list-item>
      </text:list>
      <text:p text:style-name="P309"><text:span><text:soft-page-break/></text:span><text:span/></text:p>
      <text:p text:style-name="P310"><text:span text:style-name="T1014">[🟢 Online Mode | 26.06.01_12:14:31]</text:span><text:span/></text:p>
      <text:p text:style-name="P311"><text:span text:style-name="T1015">16. 눈 감관의 소멸과 외부 세계의 닫힘</text:span><text:span/></text:p>
      <text:p text:style-name="P312"><text:span text:style-name="T1016">🔑 핵심 키워드: 안근 소멸, 시각 능력, 외적 현상, 감각의 단절, 신체 변화</text:span><text:span/></text:p>
      <text:p text:style-name="P313"><text:span text:style-name="T1017">👁️ 안근 소멸의 시작과 시각의 상실</text:span><text:span/></text:p>
      <text:p text:style-name="P314"><text:span text:style-name="T1018">우리 몸의 감각 기관이 하나씩 기능을 멈추는 과정에서, 네 번째로 눈 감관(안근)이 소멸 단계에 접어들게 돼. 이것은 마치 밤새 켜두었던 모니터의 전원 플러그를 뽑을 때 화면이 서서히 어두워지다가 완전히 암전되는 과정과 같아. 외부의 빛과 형태를 받아들여 인지하던 정밀한 센서가 수명을 다해 작동을 멈추는 현상이지.</text:span><text:span/></text:p>
      <text:p text:style-name="P315"><text:span text:style-name="T1019">🔒 멈춰버린 눈꺼풀과 제어 불능 상태</text:span><text:span/></text:p>
      <text:p text:style-name="P316"><text:span text:style-name="T1020">눈 감관이 소멸하면서 나타나는 가장 뚜렷한 외적 징후는 눈을 마음대로 감거나 뜨지 못하게 된다는 점이야. 고장 난 창문의 고정 셔터처럼, 올리거나 내리려는 제어 신호가 더 이상 통하지 않는 상태를 뜻해.</text:span><text:span/></text:p>
      <text:p text:style-name="P317"><text:span text:style-name="T1021">신체적 상태 변화:</text:span><text:span text:style-name="T1022"> 눈의 근육과 신경을 통제하던 미세한 에너지가 완전히 고갈되었기 때문에, 의지와 상관없이 눈이 반쯤 열려 있거나 그대로 고정되어 버려.</text:span><text:span/></text:p>
      <text:p text:style-name="P318"><text:span text:style-name="T1023">🎬 외부 세계와의 단절, 그리고 내면화</text:span><text:span/></text:p>
      <text:p text:style-name="P319"><text:span text:style-name="T1024">시각 감각이 닫힌다는 것은 단순히 보이지 않는 것을 넘어, 외부 세계와 연결되던 가장 큰 통로 하나가 차단됨을 의미해. 영화관에서 상영이 끝나고 영사기 불빛이 꺼지면 관객이 오롯이 어둠 속에서 자신의 상태에 집중하게 되는 것과 비슷하지. 눈을 통해 들어오던 수많은 시각 정보와 자극들이 일시에 사라지면서, 의식은 완전히 내부를 향해 깊숙이 가라앉기 시작해.</text:span><text:span/></text:p>
      <text:p text:style-name="P320"><text:span text:style-name="T1025">⚙️ 순차적인 셧다운 과정의 한 단계</text:span><text:span/></text:p>
      <text:p text:style-name="P321"><text:span text:style-name="T1026">죽음의 과정에서 일어나는 이러한 감각의 소멸은 컴퓨터가 안전하게 전원을 끄기 위해 실행 중인 프로그램을 하나씩 순서대로 종료하는 셧다운 시스템과 같아. 눈 감관의 소멸은 그중에서도 외부 지각의 핵심 축이 무너지는 중요한 단계이지.</text:span><text:span/></text:p>
      <text:list text:style-name="WWNum26" text:continue-numbering="true">
        <text:list-item>
          <text:p text:style-name="P322"><text:span text:style-name="T1027">징후의 명확성:</text:span><text:span text:style-name="T1028"> 시각의 상실은 육체적 소멸이 본격화되고 있음을 보여주는 눈 앞의 이정표야.</text:span><text:span/></text:p>
        </text:list-item>
        <text:list-item>
          <text:p text:style-name="P323"><text:span text:style-name="T1029">의식의 이행:</text:span><text:span text:style-name="T1030"> 물질적 감각이 사라진 자리에 더 미세하고 깊은 차원의 정신적 변화가 찾아올 준비를 마치는 과정이기도 해.</text:span><text:span/></text:p>
        </text:list-item>
      </text:list>
      <text:p text:style-name="P324"><text:span text:style-name="T1031">📝 핵심 요약</text:span><text:span/></text:p>
      <text:list text:style-name="WWNum26" text:continue-numbering="true">
        <text:list-item>
          <text:p text:style-name="P325"><text:span text:style-name="T1032">죽음의 과정에서 네 번째로 눈 감관(안근)이 소멸하는 단계에 이른다.</text:span><text:span/></text:p>
        </text:list-item>
        <text:list-item>
          <text:p text:style-name="P326"><text:span text:style-name="T1033">안근이 소멸하면 외적 현상으로 눈을 감거나 뜨지 못하는 제어 불능 상태가 된다.</text:span><text:span/></text:p>
        </text:list-item>
        <text:list-item>
          <text:p text:style-name="P327"><text:span text:style-name="T1034">이는 외부 세계와의 시각적 연결이 완전히 단절되고 의식이 내면화됨을 뜻한다.</text:span><text:span/></text:p>
        </text:list-item>
        <text:list-item>
          <text:p text:style-name="P328"><text:span text:style-name="T1035">컴퓨터의 순차적 셧다운처럼, 육체적 소멸과 다음 단계로의 이행을 보여주는 명확한 징후이다.</text:span><text:span/></text:p>
        </text:list-item>
      </text:list>
      <text:p text:style-name="P329"><text:span><text:soft-page-break/></text:span><text:span/></text:p>
      <text:p text:style-name="P330"><text:span text:style-name="T1036">[🟢 Online Mode | 26.06.01_12:14:38]</text:span><text:span/></text:p>
      <text:p text:style-name="P331"><text:span text:style-name="T1037">17. 생명 광채의 소멸과 거친 육신의 해체</text:span><text:span/></text:p>
      <text:p text:style-name="P332"><text:span text:style-name="T1038">🔑 핵심 키워드: 내색(內色) 소멸, 기력 고갈, 신체 광택, 거친 기운의 해체</text:span><text:span/></text:p>
      <text:p text:style-name="P333"><text:span text:style-name="T1039">🕯️ 내색의 소멸과 생명 에너지의 수축</text:span><text:span/></text:p>
      <text:p text:style-name="P334"><text:span text:style-name="T1040">우리 의식과 단단히 결합되어 있던 내면의 미세한 형태인 내색(內色)이 마침내 소멸하기 시작해. 이것은 마치 밤새도록 환하게 켜져 있던 전등의 전원이 차단되면서 필라멘트에 남아 있던 잔열과 빛이 순식간에 사그라드는 과정과 같지. 우리 몸을 유지해 주던 거친 물질적 형상들이 의식과의 연결 고리를 끊고 중심으로 수축하면서, 육체를 지탱하던 근원적인 에너지가 힘을 잃게 되는 거야.</text:span><text:span/></text:p>
      <text:p text:style-name="P335"><text:span text:style-name="T1041">🍂 빛을 잃어가는 육신의 광택</text:span><text:span/></text:p>
      <text:p text:style-name="P336"><text:span text:style-name="T1042">이 단계가 되면 겉으로 드러나는 가장 뚜렷한 변화로 몸의 생기와 광택이 눈에 띄게 사라져. 마치 싱싱하던 나뭇잎에서 수분과 영양분이 빠져나가며 순식간에 푸석푸석한 갈색 낙엽으로 변하는 것처럼, 피부의 윤기가 흐려지고 안색이 어두워지지. 육신을 화려하게 장식하던 생명의 빛깔이 바래는 현상은 물질의 시대가 끝나가고 있음을 보여주는 자연스러운 신호야.</text:span><text:span/></text:p>
      <text:p text:style-name="P337"><text:span text:style-name="T1043">⏳ 마지막 남은 근육과 기력의 고갈</text:span><text:span/></text:p>
      <text:p text:style-name="P338"><text:span text:style-name="T1044">동시에 몸 안에 남아 있던 마지막 기력마저 완전히 고갈되어 버려. 태엽을 끝까지 감아놓았던 장난감 자동차가 에너지를 다 소모하고 마지막에 몇 번 덜컹거리다가 멈춰 서는 것처럼, 손가락 하나 까딱할 수 없을 정도로 온몸의 힘이 빠져나가게 되지. 거친 육체를 움직이던 동력이 바닥나면서 몸은 완벽한 고요와 정적의 상태로 접어들게 돼.</text:span><text:span/></text:p>
      <text:p text:style-name="P339"><text:span text:style-name="T1045">🚀 더 깊은 의식으로 나아가기 위한 비움</text:span><text:span/></text:p>
      <text:p text:style-name="P340"><text:span text:style-name="T1046">비록 겉보기에는 기력이 다하고 빛이 바래는 고통스러운 소멸처럼 보이지만, 사실 이는 더 깊고 미세한 정신적 영역으로 진입하기 위해 무거운 외투를 벗는 과정이야. 이 거친 육신의 해체를 온전히 겪어내야만 우리 의식이 다음 단계의 명광을 마주할 수 있는 영적 성장의 발판이 마련되거든. 껍질이 깨져야 비로소 그 안의 진짜 알맹이가 드러나는 법이니까.</text:span><text:span/></text:p>
      <text:p text:style-name="P341"><text:span text:style-name="T1047">📝 핵심 요약</text:span><text:span/></text:p>
      <text:list text:style-name="WWNum27" text:continue-numbering="true">
        <text:list-item>
          <text:p text:style-name="P342"><text:span text:style-name="T1048">내색의 소멸은 우리 의식과 결합되어 있던 거친 물질적 형상이 중심축으로 수축하는 현상이다.</text:span><text:span/></text:p>
        </text:list-item>
        <text:list-item>
          <text:p text:style-name="P343"><text:span text:style-name="T1049">외적인 신호로 피부의 생기와 윤기가 완전히 사라지며 육신의 광택이 바래게 된다.</text:span><text:span/></text:p>
        </text:list-item>
        <text:list-item>
          <text:p text:style-name="P344"><text:span text:style-name="T1050">신체를 움직이던 마지막 동력이 소모되면서 기력이 완전히 고갈되어 정적에 이른다.</text:span><text:span/></text:p>
        </text:list-item>
        <text:list-item>
          <text:p text:style-name="P345"><text:span text:style-name="T1051">이러한 소멸 과정은 더 미세하고 고차원적인 명광의 의식으로 나아가기 위한 필수적인 비움 단계이다.</text:span><text:span/></text:p>
        </text:list-item>
      </text:list>
      <text:p text:style-name="P346"><text:span><text:soft-page-break/></text:span><text:span/></text:p>
      <text:p text:style-name="P347"><text:span text:style-name="T1052">[🟢 Online Mode | 26.06.01_12:14:45]</text:span><text:span/></text:p>
      <text:p text:style-name="P348"><text:span text:style-name="T1053">18. 내면의 에너지가 사라질 때 보이는 아지랑이 환영</text:span><text:span/></text:p>
      <text:p text:style-name="P349"><text:span text:style-name="T1054">🔑 핵심 키워드: 오대 은멸, 내적 현상, 아지랑이, 의식의 일렁임</text:span><text:span/></text:p>
      <text:p text:style-name="P350"><text:span text:style-name="T1055">⏳ 생명 원소가 사라지는 첫 신호</text:span><text:span/></text:p>
      <text:p text:style-name="P351"><text:span text:style-name="T1056">우리를 지탱하던 다섯 가지 물질적 원소들이 모두 힘을 잃고 희미해질 때, 우리의 의식은 아주 독특한 내부적 신호를 마주하게 돼. 이것은 외부의 다른 사람 눈에는 전혀 보이지 않고 오직 죽음이나 깊은 명상을 겪는 당사자의 마음속에서만 펼쳐지는 신비로운 풍경이지. 우리가 감각을 통해 굳건하다고 믿었던 거친 물질 세계가 마침내 해체되기 시작하는 첫 번째 단계라고 볼 수 있어.</text:span><text:span/></text:p>
      <text:p text:style-name="P352"><text:span text:style-name="T1057">🏜️ 모래밭의 일렁이는 아지랑이 비유</text:span><text:span/></text:p>
      <text:p text:style-name="P353"><text:span text:style-name="T1058">이때 의식 속에서 일어나는 현상은 뜨거운 봄날이나 여름날, 햇살이 내리쬐는 강변 모래밭에서 피어오르는 아지랑이와 너무나도 똑같아. 사막이나 마른 모래땅에 강한 빛이 부딪히면 공기가 뜨겁게 달아오르면서 멀리서 볼 때 마치 푸르스름한 물이 출렁거리며 흐르는 듯한 착각을 주잖아. 이처럼 거친 육체적 에너지가 소멸할 때 마음의 눈 앞에는 푸른빛을 띤 유동적인 환영이 일렁거리게 되지.</text:span><text:span/></text:p>
      <text:p text:style-name="P354"><text:span text:style-name="T1059">📺 전원이 꺼지기 직전의 전자기기</text:span><text:span/></text:p>
      <text:p text:style-name="P355"><text:span text:style-name="T1060">이해를 돕기 위해 우리가 매일 쓰는 오래된 모니터나 텔레비전을 떠올려보자. 기기의 전원 플러그를 뽑는 순간, 화면이 완전히 암전되기 바로 직전에 지익 하고 잔상이 남으면서 빛이 파르르 떨리거나 물결치는 현상이 잠시 일어나잖아. 우리 몸이라는 거대한 전자기기의 메인 전원이 차단될 때, 정신적 스크린에 아지랑이 같은 파동이 일어나는 것도 이와 똑같은 이치야.</text:span><text:span/></text:p>
      <text:p text:style-name="P356"><text:span text:style-name="T1061">🚪 더 깊은 내면으로 나아가는 관문</text:span><text:span/></text:p>
      <text:p text:style-name="P357"><text:span text:style-name="T1062">이 일렁임은 단순한 착란이 아니라, 마음이 거친 육체의 표면을 벗어나 훨씬 미세하고 깊은 영적인 차원으로 이동하고 있다는 자연스러운 증거야. 무겁게 짓누르던 육체의 제약이 걷히면서 마음이 극도로 민감하고 유연한 상태로 변하는 순간이지. 이 찰나의 변화를 두려워하지 않고 명확하게 인지하는 것이야말로 다음 단계의 영적 여정을 안전하게 이끌어가는 중요한 출발점이 돼.</text:span><text:span/></text:p>
      <text:p text:style-name="P358"><text:span text:style-name="T1063">📝 핵심 요약</text:span><text:span/></text:p>
      <text:list text:style-name="WWNum28" text:continue-numbering="true">
        <text:list-item>
          <text:p text:style-name="P359"><text:span text:style-name="T1064">다섯 가지 생명 원소가 소멸할 때 의식 내부에서 독특한 청색조의 신호가 나타남.</text:span><text:span/></text:p>
        </text:list-item>
        <text:list-item>
          <text:p text:style-name="P360"><text:span text:style-name="T1065">이것은 여름철 햇살이 모래밭에 내리쬐어 물이 출렁이는 것처럼 보이는 아지랑이 환영과 같음.</text:span><text:span/></text:p>
        </text:list-item>
        <text:list-item>
          <text:p text:style-name="P361"><text:span text:style-name="T1066">전자기기 전원이 꺼지기 직전 화면이 파르르 떨리는 것처럼 육체 에너지가 꺼질 때 생기는 잔상임.</text:span><text:span/></text:p>
        </text:list-item>
        <text:list-item>
          <text:p text:style-name="P362"><text:span text:style-name="T1067">거친 물질 차원을 벗어나 더 깊고 미세한 의식의 세계로 진입하는 첫 번째 관문임.</text:span><text:span/></text:p>
        </text:list-item>
      </text:list>
      <text:p text:style-name="P363"><text:span><text:soft-page-break/></text:span><text:span/></text:p>
      <text:p text:style-name="P364"><text:span text:style-name="T1068">19. 수온의 은멸과 감각 네트워크의 차단</text:span><text:span/></text:p>
      <text:p text:style-name="P365"><text:span text:style-name="T1069">🔑 핵심 키워드: 수온, 소멸, 몸 알음이, 감각 차단</text:span><text:span/></text:p>
      <text:p text:style-name="P366"><text:span text:style-name="T1070">🌊 느낌의 파도가 일시에 멈추는 순간</text:span><text:span/></text:p>
      <text:p text:style-name="P367"><text:span text:style-name="T1071">형색의 단계가 지나고 나면 우리 마음에서 느낌을 담당하는 거대한 영역인 수온의 부류들이 동시에 소멸하기 시작해. 평소에 우리는 끊임없이 무언가를 느끼며 살아가잖아? 하지만 이 단계에 이르면 마음에 치던 모든 파도가 순간적으로 딱 멈추게 되는 거야. 마치 거대한 콘서트장의 메인 전원 스위치를 내리면 수많은 조명과 스피커가 동시에 꺼지며 적막이 찾아오는 것과 같은 이치지.</text:span><text:span/></text:p>
      <text:p text:style-name="P368"><text:span text:style-name="T1072">🔌 신호 전달이 끊어진 감각의 모니터</text:span><text:span/></text:p>
      <text:p text:style-name="P369"><text:span text:style-name="T1073">수온이 소멸할 때 겉으로 나타나는 가장 큰 특징은 우리의 몸 알음이가 외부 감각의 신호를 전혀 인식하지 못한다는 점이야. 눈, 코, 귀 같은 감각 기관들은 아직 물리적으로 남아있지만 여기서 들어오는 정보들이 마음에 도달하지 못해. 노트북에 외부 카메라를 연결해 두었더라도 중간에 연결 케이블을 쏙 뽑아버리면 화면에 아무것도 나오지 않는 것처럼 감각의 연결선이 완전히 차단되는 거지.</text:span><text:span/></text:p>
      <text:p text:style-name="P370"><text:span text:style-name="T1074">⚖️ 기쁨도 괴로움도 사라진 절대 영도의 상태</text:span><text:span/></text:p>
      <text:p text:style-name="P371"><text:span text:style-name="T1075">이 상태가 되면 즐거운 느낌도, 괴로운 느낌도, 심지어 이도 저도 아닌 덤덤한 느낌마저도 우리 몸 알음이가 깨닫지 못하게 돼. 아무리 좋은 자극을 주거나 반대로 고통스러운 자극을 주어도 마음은 아무런 반응을 하지 않아. 정밀한 저울의 바늘이 정중앙 영점에 완전히 고정되어 있어서 위에 어떤 물건을 올려두어도 전혀 움직이지 않는 무색무취의 상태가 되는 셈이야.</text:span><text:span/></text:p>
      <text:p text:style-name="P372"><text:span text:style-name="T1076">🧘 내면의 깊은 고요를 향한 여정</text:span><text:span/></text:p>
      <text:p text:style-name="P373"><text:span text:style-name="T1077">겉보기에는 감각이 마비되어 모든 것이 끝난 것처럼 보일 수 있지만 밀교의 관점에서는 아주 중요한 전환점이야. 외부의 소음과 자극들이 완전히 차단되면서 비로소 의식이 자신의 가장 깊은 내면을 바라볼 준비를 하게 되거든. 폭풍우가 몰아치는 바다 표면을 떠나 아무런 미동도 없는 깊은 바닷속 심해로 천천히 가라앉으며 절대적인 고요를 맞이하는 과정과 같아.</text:span><text:span/></text:p>
      <text:p text:style-name="P374"><text:span text:style-name="T1078">📝 핵심 요약</text:span><text:span/></text:p>
      <text:list text:style-name="WWNum29" text:continue-numbering="true">
        <text:list-item>
          <text:p text:style-name="P375"><text:span text:style-name="T1079">느낌을 담당하는 수온의 부류들이 동시에 은멸함</text:span><text:span/></text:p>
        </text:list-item>
        <text:list-item>
          <text:p text:style-name="P376"><text:span text:style-name="T1080">감각 기관의 신호를 몸 알음이가 더 이상 인식하지 못하는 외적 현상이 일어남</text:span><text:span/></text:p>
        </text:list-item>
        <text:list-item>
          <text:p text:style-name="P377"><text:span text:style-name="T1081">괴로움, 즐거움, 덤덤함의 세 가지 느낌이 완전히 차단됨</text:span><text:span/></text:p>
        </text:list-item>
        <text:list-item>
          <text:p text:style-name="P378"><text:span text:style-name="T1082">외부 자극이 사라지면서 의식이 더 깊은 고요의 단계로 진입함</text:span><text:span/></text:p>
        </text:list-item>
      </text:list>
      <text:p text:style-name="P379"><text:span><text:soft-page-break/></text:span><text:span/></text:p>
      <text:p text:style-name="P380"><text:span text:style-name="T1083">20. 평등성지의 소멸과 감정 기억의 정화</text:span><text:span/></text:p>
      <text:p text:style-name="P381"><text:span text:style-name="T1084">🔑 핵심 키워드: 평등성지, 세 가지 느낌, 의식의 소멸, 외적 현상, 기억의 상실</text:span><text:span/></text:p>
      <text:p text:style-name="P382"><text:span text:style-name="T1085">⚖️ 모든 감정을 동등하게 바라보는 평등성지</text:span><text:span/></text:p>
      <text:p text:style-name="P383"><text:span text:style-name="T1086">우리의 마음속에는 기쁨과 슬픔, 그리고 아무런 감정도 없는 평온한 상태까지 모두 공평하게 대하는 특별한 지혜가 있어. 이를 기본의 평등성지라고 부르는데, 즐거움이나 괴로움 혹은 그저 그런 덤덤한 느낌들을 차별하지 않고 그저 하나의 느낌이라는 같은 종류로 묶어서 기억하는 마음의 작용이야. 이것은 마치 빨간 구슬, 파란 구슬, 투명한 구슬을 보고 색깔에 마음을 빼앗기지 않은 채 그저 모두 동등한 구슬일 뿐이라고 담담하게 인지하는 현명한 분류 조수와 같단다.</text:span><text:span/></text:p>
      <text:p text:style-name="P384"><text:span text:style-name="T1087">🌊 세 가지 느낌이 가진 본질적인 공통점</text:span><text:span/></text:p>
      <text:p text:style-name="P385"><text:span text:style-name="T1088">우리는 일상에서 기쁜 일이 생기면 하늘을 날아갈 듯 좋아하고, 힘든 일이 생기면 깊은 수렁에 빠진 듯 괴로워하며, 아무 일도 없을 때는 지루함을 느끼곤 해. 이 세 가지 감정은 겉보기에는 완전히 달라 보이지만, 평등성지의 시선으로 바라보면 결국 모두 마음이라는 바다 위에서 일어나는 파도에 불과해. 거센 파도든 잔잔한 물결이든 본질은 똑같은 물인 것처럼, 우리의 의식은 이 세 가지 서로 다른 경험을 모두 느낌이라는 하나의 카테고리로 묶어 기억하고 있었던 거</text:span><text:span text:style-name="T1089">지.</text:span><text:span/></text:p>
      <text:p text:style-name="P386"><text:span text:style-name="T1090">🕯️ 지혜가 서서히 무대 뒤로 사라지는 순간</text:span><text:span/></text:p>
      <text:p text:style-name="P387"><text:span text:style-name="T1091">하지만 임종의 순간이 깊어지면 세상을 공평하게 분류하던 이 평등성지의 지혜도 서서히 힘을 잃고 소멸하기 시작해. 이것은 밤이 깊어 피로해진 컴퓨터가 메모리를 정리하기 위해 실행 중이던 대형 분류 프로그램을 하나씩 종료하는 과정과 아주 비슷해. 우리 삶을 지탱하던 정교한 인지 시스템이 임무를 완수하고 다음 단계를 위해 스스로 작동을 멈추는 자연스러운 변화의 흐름이라고 볼 수 있어.</text:span><text:span/></text:p>
      <text:p text:style-name="P388"><text:span text:style-name="T1092">🌫️ 감정의 기억이 사라지는 고요한 외적 현상</text:span><text:span/></text:p>
      <text:p text:style-name="P389"><text:span text:style-name="T1093">평등성지가 소멸할 때 겉으로 나타나는 뚜렷한 현상은 바로 우리 의식 속에 수반되던 세 가지 느낌을 더 이상 기억하지 못하게 된다는 점이야. 기뻤던 추억도, 괴로웠던 상처도, 덤덤했던 순간도 모두 안개 속으로 사라지듯 기억의 저편으로 흐려지게 돼. 영화가 끝나고 스크린의 불이 꺼지면 그 어떤 화려한 장면도 남지 않는 것처럼, 의식이 감정의 흔적을 붙잡지 않으면서 마음은 극도의 고요함과 평온함을 맞이하게 되는 거란다.</text:span><text:span/></text:p>
      <text:p text:style-name="P390"><text:span text:style-name="T1094">📝 핵심 요약</text:span><text:span/></text:p>
      <text:list text:style-name="WWNum30" text:continue-numbering="true">
        <text:list-item>
          <text:p text:style-name="P391"><text:span text:style-name="T1095">평등성지는 괴로움, 즐거움, 비고비락의 세 가지 느낌을 차별 없이 하나의 느낌으로 기억하는 지혜다.</text:span><text:span/></text:p>
        </text:list-item>
        <text:list-item>
          <text:p text:style-name="P392"><text:span text:style-name="T1096">이 지혜는 우리 마음속에서 일어나는 서로 다른 감정적 경험을 평등하게 융합해 주는 역할을 한다.</text:span><text:span/></text:p>
        </text:list-item>
        <text:list-item>
          <text:p text:style-name="P393"><text:span text:style-name="T1097">임종의 과정이 진행되면 이 평등성지의 지혜 역시 서서히 소멸의 단계로 접어들게 된다.</text:span><text:span/></text:p>
        </text:list-item>
        <text:list-item>
          <text:p text:style-name="P394"><text:span text:style-name="T1098">평등성지가 소멸하면 의식에 동반되던 세 가지 감정의 느낌을 더 이상 기억하지 못하는 외적 현상이 일어난다.</text:span><text:span/></text:p>
        </text:list-item>
      </text:list>
      <text:p text:style-name="P395"><text:span><text:soft-page-break/></text:span><text:span/></text:p>
      <text:p text:style-name="P396"><text:span text:style-name="T1099">[🟢 Online Mode | 26.06.01_12:42:11]</text:span><text:span/></text:p>
      <text:p text:style-name="P397"><text:span text:style-name="T1100">21. 물 원소의 소멸과 신체 액체의 메마름 현상</text:span><text:span/></text:p>
      <text:p text:style-name="P398"><text:span text:style-name="T1101">🔑 핵심 키워드: 물 원소 소멸, 외적 현상, 신체 액체의 고갈, 생명력의 감퇴</text:span><text:span/></text:p>
      <text:p text:style-name="P399"><text:span text:style-name="T1102">💧 생명의 강줄기가 마르는 과정</text:span><text:span/></text:p>
      <text:p text:style-name="P400"><text:span text:style-name="T1103">우리 몸을 지탱하던 거대한 수분 에너지가 서서히 힘을 잃고 사라지는 단계야. 자연계에서 극심한 가뭄이 찾아오면 울창하던 숲의 모든 물줄기가 멈추는 것처럼, 죽음의 과정에서 물 원소가 소멸하면 몸 안의 모든 수분 공급망이 차단되기 시작해. 생명을 유지하기 위해 부지런히 흐르던 내면의 강물이 마침내 흐름을 멈추는 순간이라고 볼 수 있어.</text:span><text:span/></text:p>
      <text:p text:style-name="P401"><text:span text:style-name="T1104">🏜️ 외적으로 드러나는 가뭄의 신호</text:span><text:span/></text:p>
      <text:p text:style-name="P402"><text:span text:style-name="T1105">이 변화는 몸 밖으로 아주 뚜렷하게 드러나는데, 가장 먼저 침과 땀, 그리고 소변이 눈에 띄게 말라버려. 뜨거운 사막 한가운데서 한 모금의 물도 마시지 못해 온몸이 바싹 타들어 가는 상태와 비슷하지. 수분을 배출하고 순환시키던 몸의 대사 기능이 완전히 멈추면서, 피부와 점막을 촉촉하게 적시던 액체들이 순식간에 고갈되는 거야.</text:span><text:span/></text:p>
      <text:p text:style-name="P403"><text:span text:style-name="T1106">🩸 생명의 근원인 혈액과 유체의 고갈</text:span><text:span/></text:p>
      <text:p text:style-name="P404"><text:span text:style-name="T1107">더 깊은 곳에서는 몸의 가장 소중한 액체인 피와 정액 같은 재생 유체들마저 대부분 말라붙어. 자동차로 비유하자면 엔진을 매끄럽게 돌려주던 엔진오일과 냉각수가 완전히 바닥나서 엔진이 까맣게 타들어 가는 것과 같아. 온몸의 세포에 영양을 공급하던 붉은 강줄기가 말라붙으면서 육체라는 기계는 최종 정지를 향해 급격히 나아가게 돼.</text:span><text:span/></text:p>
      <text:p text:style-name="P405"><text:span text:style-name="T1108">🛑 수분 제어 장치의 완전한 셧다운</text:span><text:span/></text:p>
      <text:p text:style-name="P406"><text:span text:style-name="T1109">결국 이 현상은 몸이라는 유기체가 수분을 보유하고 조절하는 통제력을 완전히 상실했음을 보여주는 결정적 신호야. 가전제품의 냉각 시스템이 고장 나서 내부의 액체 순환이 멈추고 과열되다 결국 시스템 전체가 타버리는 과정과 흡사해. 이렇게 외적인 액체들이 모두 메마르는 모습을 통해 물 원소가 완전히 소멸했음을 명확하게 확인할 수 있어.</text:span><text:span/></text:p>
      <text:p text:style-name="P407"><text:span text:style-name="T1110">📝 핵심 요약</text:span><text:span/></text:p>
      <text:list text:style-name="WWNum31" text:continue-numbering="true">
        <text:list-item>
          <text:p text:style-name="P408"><text:span text:style-name="T1111">물 원소가 소멸하면서 몸 안의 모든 수분 순환과 공급망이 차단되기 시작해.</text:span><text:span/></text:p>
        </text:list-item>
        <text:list-item>
          <text:p text:style-name="P409"><text:span text:style-name="T1112">침, 땀, 소변이 눈에 띄게 말라붙는 가뭄 현상이 외적으로 뚜렷하게 관찰돼.</text:span><text:span/></text:p>
        </text:list-item>
        <text:list-item>
          <text:p text:style-name="P410"><text:span text:style-name="T1113">생명을 지탱하던 가장 깊은 액체인 피와 정액마저 고갈되며 육체의 엔진이 멈춰가.</text:span><text:span/></text:p>
        </text:list-item>
        <text:list-item>
          <text:p text:style-name="P411"><text:span text:style-name="T1114">이는 몸의 수분 통제 시스템이 완전히 셧다운 되었음을 알려주는 명확한 죽음의 신호야.</text:span><text:span/></text:p>
        </text:list-item>
      </text:list>
      <text:p text:style-name="P412"><text:span><text:soft-page-break/></text:span><text:span/></text:p>
      <text:p text:style-name="P413"><text:span text:style-name="T1115">22. 귀 감관의 소멸과 소리 없는 세계로의 진입</text:span><text:span/></text:p>
      <text:p text:style-name="P414"><text:span text:style-name="T1116">🔑 핵심 키워드: 귀 감관, 소멸 현상, 청각 상실, 내외의 소리</text:span><text:span/></text:p>
      <text:p text:style-name="P415"><text:span text:style-name="T1117">🎧 소리의 채널이 서서히 닫히는 순간</text:span><text:span/></text:p>
      <text:p text:style-name="P416"><text:span text:style-name="T1118">몸의 거친 원소들이 해체되는 여정 속에서 이번에는 소리를 담당하는 귀 감관이 멈추는 단계에 접어들게 돼. 이것은 마치 밤늦게 라디오를 듣다가 볼륨을 완전히 줄이거나 스피커 플러그를 뽑는 것과 비슷하지. 세상의 다양한 울림을 받아들이던 안테나가 수신을 중단하면서, 우리의 의식은 소리라는 거친 자극으로부터 한 걸음 더 멀어지게 되는 거야.</text:span><text:span/></text:p>
      <text:p text:style-name="P417"><text:span text:style-name="T1119">🌊 깊은 바닷속으로 들어가는 고요함</text:span><text:span/></text:p>
      <text:p text:style-name="P418"><text:span text:style-name="T1120">귀 감관이 소멸하면서 나타나는 가장 첫 번째 변화는 바깥에서 들려오는 모든 소리가 사라지는 현상이야. 자동차 소리, 사람들이 대화하는 소리, 바람에 흔들리는 나뭇가지 소리가 더 이상 들리지 않게 되지. 마치 무겁고 두꺼운 수중 장비를 착용하고 깊은 바다 한가운데로 가라앉을 때, 수면 위의 소음들이 순식간에 멀어지며 먹먹한 고요함만 남는 것과 아주 똑같아.</text:span><text:span/></text:p>
      <text:p text:style-name="P419"><text:span text:style-name="T1121">🤫 내면의 마지막 울림까지 멈추는 침묵</text:span><text:span/></text:p>
      <text:p text:style-name="P420"><text:span text:style-name="T1122">더욱 신기한 건 바깥의 소리뿐만 아니라 내 안에서 나던 소리까지 모두 멈춘다는 점이야. 평소에는 의식하지 못했던 숨소리, 심장이 뛰는 쿵쾅거림, 혈액이 혈관을 타고 흐르는 미세한 진동조차 완전히 사라지게 돼. 컴퓨터를 오래 켜두면 안에서 웅웅거리며 돌아가던 냉각팬 소리가 전원을 끄는 순간 완전히 멈추며 완벽한 정적이 찾아오는 것처럼, 내 몸의 내부 시스템이 내던 마지막 소음까지 꺼지는 단계지.</text:span><text:span/></text:p>
      <text:p text:style-name="P421"><text:span text:style-name="T1123">🚪 내면의 가장 깊은 곳을 향한 관문</text:span><text:span/></text:p>
      <text:p text:style-name="P422"><text:span text:style-name="T1124">소리가 사라진다는 건 단순한 감각의 상실이 아니라, 의식이 더 미세한 영역으로 집중하기 위한 필연적인 과정이야. 방 안에서 중요한 공부나 명상을 할 때 집중도를 높이기 위해 창문을 꼭 닫고 외부 소음을 차단하는 것과 같은 이치지. 청각이 완전히 차단되면서 마음은 이제 겉도는 감각에 한눈을 팔지 않고, 존재의 가장 중심부를 향해 흔들림 없이 나아갈 수 있는 완벽한 환경을 맞이하게 돼.</text:span><text:span/></text:p>
      <text:p text:style-name="P423"><text:span text:style-name="T1125">📝 핵심 요약</text:span><text:span/></text:p>
      <text:list text:style-name="WWNum32" text:continue-numbering="true">
        <text:list-item>
          <text:p text:style-name="P424"><text:span text:style-name="T1126">거친 원소의 해체 과정 중 청각을 담당하는 귀 감관이 기능을 멈춘다.</text:span><text:span/></text:p>
        </text:list-item>
        <text:list-item>
          <text:p text:style-name="P425"><text:span text:style-name="T1127">첫 번째 외적 징후로 주변의 모든 외부 소음이 들리지 않게 된다.</text:span><text:span/></text:p>
        </text:list-item>
        <text:list-item>
          <text:p text:style-name="P426"><text:span text:style-name="T1128">신체 내부에서 발생하던 숨소리와 심장박동 등의 내적인 소리까지 완전히 소멸한다.</text:span><text:span/></text:p>
        </text:list-item>
        <text:list-item>
          <text:p text:style-name="P427"><text:span text:style-name="T1129">소리의 차단은 의식이 거친 감각에서 벗어나 깊은 내면으로 침잠하도록 돕는 역할을 한다.</text:span><text:span/></text:p>
        </text:list-item>
      </text:list>
      <text:p text:style-name="P428"><text:span><text:soft-page-break/></text:span><text:span/></text:p>
      <text:p text:style-name="P429"><text:span text:style-name="T1130">[🔴 Offline Mode | 26.06.01_12:42:26]</text:span><text:span/></text:p>
      <text:p text:style-name="P430"><text:span text:style-name="T1131">23. 내부 소리의 소멸과 침묵의 시작</text:span><text:span/></text:p>
      <text:p text:style-name="P431"><text:span text:style-name="T1132">🔑 핵심 키워드: 내성, 소리 소멸, 이명 중단, 절대 침묵</text:span><text:span/></text:p>
      <text:p text:style-name="P432"><text:span text:style-name="T1133">👂 내면의 울림과 마지막 감각의 변화</text:span><text:span/></text:p>
      <text:p text:style-name="P433"><text:span text:style-name="T1134">우리 몸과 마음이 고요해지는 과정에서 다섯 번째로 일어나는 변화는 바로 마음에 귀속되어 있던 내부의 소리가 완전히 소멸하는 단계야. 평소에 우리는 잘 인지하지 못하지만, 살아있는 생명체는 누구나 내면에서 고유한 진동과 미세한 울림을 계속해서 만들어내고 있거든. 이것은 마치 아무도 없는 조용한 방에 가만히 앉아 있을 때 은은하게 들려오는 냉장고의 모터 소리나 컴퓨터 본체의 미세한 팬 소리와도 같아. 생명의 에너지가 끊임없이 순환하며 내는 존재의 흔적인 셈이</text:span><text:span text:style-name="T1135">지.</text:span><text:span/></text:p>
      <text:p text:style-name="P434"><text:span text:style-name="T1136">🤫 귀 고유의 진동음이 사라지는 순간</text:span><text:span/></text:p>
      <text:p text:style-name="P435"><text:span text:style-name="T1137">이 단계에 이르면 그동안 귀 안쪽에서 은은하게 맴돌던 웅 하는 소리가 마침내 완벽하게 멈추게 되는 외적 현상이 나타나. 우리는 평소에 완전한 소음 차단 공간에 들어가도 귀 자체에서 들리는 미세한 주파수 같은 소리를 느끼곤 하는데, 그 마지막 연결고리가 끊어지는 거야. 라디오의 전원을 완전히 차단했을 때 지직거리던 미세한 백색소음마저 순식간에 사라지고 완벽한 적막이 찾아오는 것처럼, 귀 내부의 고유한 울림이 자취를 감추게 돼.</text:span><text:span/></text:p>
      <text:p text:style-name="P436"><text:span text:style-name="T1138">🌊 마음의 파도가 멈추는 절대적 침묵</text:span><text:span/></text:p>
      <text:p text:style-name="P437"><text:span text:style-name="T1139">내부의 소리가 사라진다는 것은 단순히 청각 기능이 마비되는 것을 넘어, 마음이 물질적인 감각의 파도로부터 완전히 독립한다는 것을 의미해. 소리는 본래 무언가 부딪히고 떨려야 발생하는 현상이지만, 이제 그 모든 내적인 움직임과 떨림이 멈추었기 때문에 더 이상 소리가 태어날 기반이 없어진 거지. 이는 세차게 불던 바람이 잦아들면서 호수의 잔물결이 하나둘씩 사라지고, 마침내 거울처럼 매끄럽고 고요한 수면만 남는 상태와 아주 비슷해.</text:span><text:span/></text:p>
      <text:p text:style-name="P438"><text:span text:style-name="T1140">🌌 감각의 은멸이 완성하는 고요한 종말</text:span><text:span/></text:p>
      <text:p text:style-name="P439"><text:span text:style-name="T1141">이렇게 귀 안의 웅 하는 소리가 사라지는 현상은 육체적 존재로서 외부 세계와 소통하던 청각적 통로가 완전히 닫혔음을 보여주는 결정적인 신호야. 내면의 소리가 소멸하면서 영혼은 한층 더 깊은 의식의 중심부로 가라앉게 되고, 주변의 모든 환경으로부터 완전히 분리된 절대적인 고요를 맞이하게 되지. 살아 숨 쉬던 육체의 마지막 흔적들이 하나씩 지워지며, 존재는 물질의 세계를 지나 다음 차원의 완전한 평온을 향해 엄숙하게 걸어가고 있는 거야.</text:span><text:span/></text:p>
      <text:p text:style-name="P440"><text:span text:style-name="T1142">📝 핵심 요약</text:span><text:span/></text:p>
      <text:list text:style-name="WWNum33" text:continue-numbering="true">
        <text:list-item>
          <text:p text:style-name="P441"><text:span text:style-name="T1143">마음에 귀속되어 있던 내부의 소리인 내성이 소멸하는 단계에 접어듦.</text:span><text:span/></text:p>
        </text:list-item>
        <text:list-item>
          <text:p text:style-name="P442"><text:span text:style-name="T1144">외적 현상으로 귀 내부에서 늘 들리던 미세한 웅 하는 소리를 더 이상 듣지 못하게 됨.</text:span><text:span/></text:p>
        </text:list-item>
        <text:list-item>
          <text:p text:style-name="P443"><text:span text:style-name="T1145">라디오 전원이 꺼지듯 내면의 모든 백색소음과 진동이 멈추고 절대적 적막이 찾아옴.</text:span><text:span/></text:p>
        </text:list-item>
        <text:list-item>
          <text:p text:style-name="P444"><text:span text:style-name="T1146">청각적 통로가 완전히 차단되면서 외부 세계와 완전히 분리된 고요한 상태에 이름.</text:span><text:span/></text:p>
        </text:list-item>
      </text:list>
      <text:p text:style-name="P445"><text:span><text:soft-page-break/></text:span><text:span/></text:p>
      <text:p text:style-name="P446"><text:span text:style-name="T1147">24. 내적 해체와 연기의 징후 발현</text:span><text:span/></text:p>
      <text:p text:style-name="P447"><text:span text:style-name="T1148">🔑 핵심 키워드: 내적 현상, 은멸, 푸른 연기, 의식 미세화</text:span><text:span/></text:p>
      <text:p text:style-name="P448"><text:span text:style-name="T1149">🌫️ 거친 에너지가 사라진 자리</text:span><text:span/></text:p>
      <text:p text:style-name="P449"><text:span text:style-name="T1150">외부적인 신체 반응과 감각들이 가라앉으면 마음의 가장 깊은 곳에서 두 번째 신호가 나타나기 시작해. 이것은 마치 무대 위의 화려한 조명들이 하나씩 꺼진 뒤에 무대 뒤편에서 은은한 효과 장치가 작동하는 것과 같지. 물의 요소와 귀의 감각 같은 다섯 가지 거친 성질들이 모두 내면으로 흡수되면서 의식은 더욱 깊고 미세한 영역으로 들어갈 준비를 마치는 단계야. 불필요한 소음이 사라지고 고요함이 찾아오는 과정이지.</text:span><text:span/></text:p>
      <text:p text:style-name="P450"><text:span text:style-name="T1151">🌬️ 마음의 눈에 펼쳐지는 연기의 풍경</text:span><text:span/></text:p>
      <text:p text:style-name="P451"><text:span text:style-name="T1152">이때 의식 속에는 연기가 자욱하게 깔린 것 같은 독특한 풍경이 펼쳐지게 돼. 시골 마을의 굴뚝에서 푸른 연기가 뭉글뭉글 피어오르는 모습처럼 고요하면서도 신비로운 시각적 현상이 내면의 전면에 등장하지. 이것은 눈으로 직접 보는 외부의 물질이 아니라, 마음이 한 단계 더 깊은 차원으로 진입하고 있음을 스스로에게 보여주는 영적인 신호등이야.</text:span><text:span/></text:p>
      <text:p text:style-name="P452"><text:span text:style-name="T1153">🌊 물질에서 미세함으로 가는 징검다리</text:span><text:span/></text:p>
      <text:p text:style-name="P453"><text:span text:style-name="T1154">이 연기의 징후는 우리가 물질적인 세계의 지각을 완전히 마감하고 전혀 새로운 의식의 바다로 건너가고 있음을 뜻해. 안개가 짙게 낀 새벽길을 걸어갈 때 주변 풍경이 희미해지면서 오직 자신의 내면에만 집중하게 되는 경험과 비슷하지. 의식이 육체의 한계를 벗어나 아주 순수한 에너지 상태로 전환되는 중요한 길목에 서 있는 셈이야.</text:span><text:span/></text:p>
      <text:p text:style-name="P454"><text:span text:style-name="T1155">📊 변화하는 내면의 상태 비교</text:span><text:span/></text:p>
      <text:p text:style-name="P455"><text:span text:style-name="T1156">이 시점에서 일어나는 의식의 구체적인 변화를 직관적으로 이해할 수 있도록 구조화된 구조로 보여줄게.</text:span><text:span/></text:p>
      <table:table table:style-name="ta4">
        <table:table-columns>
          <table:table-column table:style-name="co9"/>
          <table:table-column table:style-name="co10"/>
          <table:table-column table:style-name="co11"/>
        </table:table-columns>
        <table:table-row table:style-name="ro11" table:default-cell-style-name="ce30">
          <table:table-cell table:style-name="ce31">
            <text:p text:style-name="P456"><text:span text:style-name="T1157">지각의 경계</text:span><text:span/></text:p>
          </table:table-cell>
          <table:table-cell table:style-name="ce32">
            <text:p text:style-name="P457"><text:span text:style-name="T1158">이전 단계의 상태</text:span><text:span/></text:p>
          </table:table-cell>
          <table:table-cell table:style-name="ce33">
            <text:p text:style-name="P458"><text:span text:style-name="T1159">연기 현상 단계의 상태</text:span><text:span/></text:p>
          </table:table-cell>
        </table:table-row>
        <table:table-row table:style-name="ro12" table:default-cell-style-name="ce30">
          <table:table-cell table:style-name="ce34">
            <text:p text:style-name="P459"><text:span text:style-name="T1160">외부 감각</text:span><text:span/></text:p>
          </table:table-cell>
          <table:table-cell table:style-name="ce35">
            <text:p text:style-name="P460"><text:span text:style-name="T1161">소리가 들리고 신체 감각이 유지됨</text:span><text:span/></text:p>
          </table:table-cell>
          <table:table-cell table:style-name="ce36">
            <text:p text:style-name="P461"><text:span text:style-name="T1162">외부 소리와 이물질감이 완전히 차단됨</text:span><text:span/></text:p>
          </table:table-cell>
        </table:table-row>
        <table:table-row table:style-name="ro13" table:default-cell-style-name="ce30">
          <table:table-cell table:style-name="ce37">
            <text:p text:style-name="P462"><text:span text:style-name="T1163">내부 지각</text:span><text:span/></text:p>
          </table:table-cell>
          <table:table-cell table:style-name="ce38">
            <text:p text:style-name="P463"><text:span text:style-name="T1164">아지랑이 같은 미세한 움직임이 보임</text:span><text:span/></text:p>
          </table:table-cell>
          <table:table-cell table:style-name="ce39">
            <text:p text:style-name="P464"><text:span text:style-name="T1165">푸른 연기가 자욱하게 피어오름</text:span><text:span/></text:p>
          </table:table-cell>
        </table:table-row>
        <table:table-row table:style-name="ro14" table:default-cell-style-name="ce30">
          <table:table-cell table:style-name="ce40">
            <text:p text:style-name="P465"><text:span text:style-name="T1166">의식 상태</text:span><text:span/></text:p>
          </table:table-cell>
          <table:table-cell table:style-name="ce41">
            <text:p text:style-name="P466"><text:span text:style-name="T1167">거친 물질 세계를 주로 지각함</text:span><text:span/></text:p>
          </table:table-cell>
          <table:table-cell table:style-name="ce42">
            <text:p text:style-name="P467"><text:span text:style-name="T1168">미세한 에너지 세계로 깊이 진입함</text:span><text:span/></text:p>
          </table:table-cell>
        </table:table-row>
      </table:table>
      <text:p text:style-name="P468"><text:span text:style-name="T1169">📝 핵심 요약</text:span><text:span/></text:p>
      <text:list text:style-name="WWNum34" text:continue-numbering="true">
        <text:list-item>
          <text:p text:style-name="P469"><text:span text:style-name="T1170">다섯 가지 거친 요소와 감각이 내면으로 흡수되면서 두 번째 내적 징후가 나타남</text:span><text:span/></text:p>
        </text:list-item>
        <text:list-item>
          <text:p text:style-name="P470"><text:span text:style-name="T1171">마치 굴뚝에서 푸른 연기가 뭉글뭉글 피어오르는 듯한 시각적 현상이 의식에 펼쳐짐</text:span><text:span/></text:p>
        </text:list-item>
        <text:list-item>
          <text:p text:style-name="P471"><text:span text:style-name="T1172">이 현상은 외부의 물질을 보는 것이 아니라 마음이 미세한 차원으로 들어가는 신호임</text:span><text:span/></text:p>
        </text:list-item>
        <text:list-item>
          <text:p text:style-name="P472"><text:span text:style-name="T1173">안개 낀 새벽길처럼 거친 물질 세계의 지각이 마감되고 순수한 에너지 상태로 전환됨</text:span><text:span/></text:p>
        </text:list-item>
      </text:list>
      <text:p text:style-name="P473"><text:span><text:soft-page-break/></text:span><text:span/></text:p>
      <text:p text:style-name="P474"><text:span text:style-name="T1174">[🟢 Online Mode | 26.06.01_12:42:41]</text:span><text:span/></text:p>
      <text:p text:style-name="P475"><text:span text:style-name="T1175">25. 상온의 소멸과 관계 기억의 해체</text:span><text:span/></text:p>
      <text:p text:style-name="P476"><text:span text:style-name="T1176">🔑 핵심 키워드: 상온 소멸, 다섯 원소 동시 은멸, 기억 소실, 관계의 망각</text:span><text:span/></text:p>
      <text:p text:style-name="P477"><text:span text:style-name="T1177">🧠 인식의 도서관 셧다운</text:span><text:span/></text:p>
      <text:p text:style-name="P478"><text:span text:style-name="T1178">세상을 구별하고 이름을 붙이는 인지 시스템인 상온이 해체되기 시작하는 단계야. 비유하자면 머릿속에 수많은 책을 카테고리별로 깔끔하게 분류해 둔 거대한 도서관의 전원이 꺼지는 것과 같아. 이 능력이 사라지면 평생 쌓아온 세상에 대한 개념과 구별 능력이 한순간에 무너지게 돼.</text:span><text:span/></text:p>
      <text:p text:style-name="P479"><text:span text:style-name="T1179">⚡ 다섯 가닥 전선의 동시 차단</text:span><text:span/></text:p>
      <table:table table:style-name="ta5">
        <table:table-columns>
          <table:table-column table:style-name="co12"/>
          <table:table-column table:style-name="co13"/>
          <table:table-column table:style-name="co14"/>
        </table:table-columns>
        <table:table-row table:style-name="ro15" table:default-cell-style-name="ce43">
          <table:table-cell table:style-name="ce44">
            <text:p text:style-name="P480"><text:span text:style-name="T1180">구분</text:span><text:span/></text:p>
          </table:table-cell>
          <table:table-cell table:style-name="ce45">
            <text:p text:style-name="P481"><text:span text:style-name="T1181">진행 방식</text:span><text:span/></text:p>
          </table:table-cell>
          <table:table-cell table:style-name="ce46">
            <text:p text:style-name="P482"><text:span text:style-name="T1182">직관적 비유</text:span><text:span/></text:p>
          </table:table-cell>
        </table:table-row>
        <table:table-row table:style-name="ro16" table:default-cell-style-name="ce43">
          <table:table-cell table:style-name="ce47">
            <text:p text:style-name="P483"><text:span text:style-name="T1183">상온의 다섯 부류 원소 은멸</text:span><text:span/></text:p>
          </table:table-cell>
          <table:table-cell table:style-name="ce48">
            <text:p text:style-name="P484"><text:span text:style-name="T1184">어떠한 시차도 없이 한꺼번에 동시에 소멸함</text:span><text:span/></text:p>
          </table:table-cell>
          <table:table-cell table:style-name="ce49">
            <text:p text:style-name="P485"><text:span text:style-name="T1185">메인 스위치를 내려 연결된 다섯 개의 전등이 동시에 탁 꺼지는 현상</text:span><text:span/></text:p>
          </table:table-cell>
        </table:table-row>
      </table:table>
      <text:p text:style-name="P486"><text:span text:style-name="T1186">🌫️ 사라지는 이정표와 인지의 안개</text:span><text:span/></text:p>
      <text:list text:style-name="WWNum35" text:continue-numbering="true">
        <text:list-item>
          <text:p text:style-name="P487"><text:span text:style-name="T1187">세상의 사물을 판단하고 분별하던 기존의 기준이 급격하게 흐려짐</text:span><text:span/></text:p>
        </text:list-item>
        <text:list-item>
          <text:p text:style-name="P488"><text:span text:style-name="T1188">좋고 나쁨, 가깝고 먼 것에 대한 이성적인 헤아림이 완전히 정지함</text:span><text:span/></text:p>
        </text:list-item>
        <text:list-item>
          <text:p text:style-name="P489"><text:span text:style-name="T1189">정신적인 서치라이트가 꺼지면서 의식이 짙은 안개 속으로 걸어 들어가는 상태가 됨</text:span><text:span/></text:p>
        </text:list-item>
      </text:list>
      <text:p text:style-name="P490"><text:span text:style-name="T1190">💔 부모조차 알아보지 못하는 기억의 지우개</text:span><text:span/></text:p>
      <text:p text:style-name="P491"><text:span text:style-name="T1191">이 단계에서 나타나는 가장 분명한 외적 증거는 나를 세상에 태어나게 해준 부모나 평생을 함께한 친족들의 얼굴과 존재 의미를 전혀 기억하지 못한다는 점이야. 비유하자면 소중한 사람들과의 추억이 담긴 사진첩 위에 물을 쏟아부어 형태와 형상이 완전히 번져버린 것과 같지. 혈연이라는 가장 깊은 유대감마저 인지 체계의 해체 앞에서는 힘없이 지워지게 돼.</text:span><text:span/></text:p>
      <text:p text:style-name="P492"><text:span text:style-name="T1192">📝 핵심 요약</text:span><text:span/></text:p>
      <text:list text:style-name="WWNum35" text:continue-numbering="true">
        <text:list-item>
          <text:p text:style-name="P493"><text:span text:style-name="T1193">사물을 분별하고 헤아리는 인지 기능인 상온이 본격적인 해체 단계에 진입함.</text:span><text:span/></text:p>
        </text:list-item>
        <text:list-item>
          <text:p text:style-name="P494"><text:span text:style-name="T1194">상온의 부류에 속하는 다섯 가지 원소들이 시차 없이 동시에 소멸하는 현상이 일어남.</text:span><text:span/></text:p>
        </text:list-item>
        <text:list-item>
          <text:p text:style-name="P495"><text:span text:style-name="T1195">이성적인 판단과 분별 능력이 정지되면서 의식이 극도의 혼돈과 안개 속에 갇힘.</text:span><text:span/></text:p>
        </text:list-item>
        <text:list-item>
          <text:p text:style-name="P496"><text:span text:style-name="T1196">부모와 친족을 포함한 가장 가깝고 소중한 관계에 대한 기억과 의미를 완전히 상실함.</text:span><text:span/></text:p>
        </text:list-item>
      </text:list>
      <text:p text:style-name="P497"><text:span><text:soft-page-break/></text:span><text:span/></text:p>
      <text:p text:style-name="P498"><text:span text:style-name="T1197">26. 묘관찰지의 소멸과 기억의 방전</text:span><text:span/></text:p>
      <text:p text:style-name="P499"><text:span text:style-name="T1198">🔑 핵심 키워드: 묘관찰지, 기억 소멸, 친족 이름 망각, 의식의 해체, 인지 기능 저하</text:span><text:span/></text:p>
      <text:p text:style-name="P500"><text:span text:style-name="T1199">🧠 관계를 식별하는 영리한 인지 렌즈</text:span><text:span/></text:p>
      <text:p text:style-name="P501"><text:span text:style-name="T1200">기본의 묘관찰지는 우리가 세상을 살아가며 주변 사람들과의 관계를 정밀하게 분별하고 기억하는 마음의 인지 렌즈야. 단순히 똑똑한 것을 넘어, 내 곁의 소중한 친척이나 친구가 누구인지, 그들과 어떤 관계인지를 일일이 구분해 내는 영리한 지혜를 뜻하지. 스마트폰으로 치면 내 연락처 앱에 수백 명의 이름과 관계, 특징을 상세하게 저장해 두고 필요할 때마다 찰나의 순간에 불러오는 고성능 데이터베이스 시스템과 같아.</text:span><text:span/></text:p>
      <text:p text:style-name="P502"><text:span text:style-name="T1201">🛑 가장 가까운 이름부터 지워지는 외적 징후</text:span><text:span/></text:p>
      <text:p text:style-name="P503"><text:span text:style-name="T1202">이 묘관찰지의 에너지가 소멸 단계에 접어들면, 겉으로 드러나는 가장 슬프고도 확실한 징후가 나타나게 돼. 바로 평생을 함께해 온 친족들은 물론, 나를 세상에 태어나게 해 준 부모님의 이름조차 기억하지 못하게 되는 현상이지. 눈앞에 있는 사람이 분명 내게 가장 소중한 사람이라는 미세한 느낌은 남아있을지 몰라도, 그를 지칭하는 명확한 언어적 이름표는 의식의 수면 위로 더 이상 떠오르지 않게 되는 상태야.</text:span><text:span/></text:p>
      <text:p text:style-name="P504"><text:span text:style-name="T1203">💾 의식이라는 하드디스크의 포맷 과정</text:span><text:span/></text:p>
      <text:p text:style-name="P505"><text:span text:style-name="T1204">이것은 마치 오랜 시간 사용하던 컴퓨터를 안전하게 종료하기 전에, 하드디스크에 저장되어 있던 주소록 파일들이 하나씩 영구적으로 삭제되는 과정과 비슷해. 가장 깊숙하고 단단하게 저장되어 있던 '부모님'이라는 최상위 폴더의 링크마저 툭 끊어져 버리는 거지. 컴퓨터 전원이 완전히 꺼지기 직전, 메모리에 상주하던 데이터들이 차례로 지워지며 시스템이 가벼워지는 마지막 정리 작업이라고 볼 수 있어.</text:span><text:span/></text:p>
      <text:p text:style-name="P506"><text:span text:style-name="T1205">🕊️ 분별의 세계를 넘어 고요함으로 향하는 여정</text:span><text:span/></text:p>
      <text:p text:style-name="P507"><text:span text:style-name="T1206">불교의 관점에서 이 이름들을 잊어버리는 현상은 단순한 기억의 정지가 아니라, 평생 동안 나를 얽매고 있던 '너와 나', '내 가족과 남'이라는 이분법적인 분별의 틀이 해체되는 과정이야. 세상을 조각조각 나누어 보던 정교한 시선이 거두어지고, 더 이상 이름이나 지위에 갇히지 않는 거대하고 고요한 순수 의식의 바다로 나아가기 위한 필연적인 통과 의례인 셈이지.</text:span><text:span/></text:p>
      <text:p text:style-name="P508"><text:span text:style-name="T1207">📝 핵심 요약</text:span><text:span/></text:p>
      <text:list text:style-name="WWNum36" text:continue-numbering="true">
        <text:list-item>
          <text:p text:style-name="P509"><text:span text:style-name="T1208">묘관찰지는 주변 친족들의 이름과 관계를 일일이 구별하고 기억하는 마음의 인지 능력이다.</text:span><text:span/></text:p>
        </text:list-item>
        <text:list-item>
          <text:p text:style-name="P510"><text:span text:style-name="T1209">이 지혜가 소멸할 때 나타나는 외적 현상은 부모와 친척의 이름조차 기억하지 못하는 것이다.</text:span><text:span/></text:p>
        </text:list-item>
        <text:list-item>
          <text:p text:style-name="P511"><text:span text:style-name="T1210">이는 의식의 주소록 파일이 삭제되는 것처럼, 언어적 구별 능력이 완전히 멈추는 과정과 같다.</text:span><text:span/></text:p>
        </text:list-item>
        <text:list-item>
          <text:p text:style-name="P512"><text:span text:style-name="T1211">궁극적으로는 대상의 이름을 나누던 분별의 틀을 벗어나 순수한 내면의 상태로 들어가는 단계이다.</text:span><text:span/></text:p>
        </text:list-item>
      </text:list>
      <text:p text:style-name="P513"><text:span><text:soft-page-break/></text:span><text:span/></text:p>
      <text:p text:style-name="P514"><text:span text:style-name="T1212">[🟢 Online Mode | 26.06.01_12:42:56]</text:span><text:span/></text:p>
      <text:p text:style-name="P515"><text:span text:style-name="T1213">27. 체온의 냉각과 소화력의 완전한 정지</text:span><text:span/></text:p>
      <text:p text:style-name="P516"><text:span text:style-name="T1214">🔑 핵심 키워드: 불 원소 소멸, 체온 저하, 소화 기능 상실, 대사 활동 정지</text:span><text:span/></text:p>
      <text:p text:style-name="P517"><text:span text:style-name="T1215">🔥 불 원소의 소멸과 근원적 화력의 수축</text:span><text:span/></text:p>
      <text:p text:style-name="P518"><text:span text:style-name="T1216">우리 몸을 따뜻하게 유지하고 생명 활동의 에너지를 공급하던 불 원소가 마침내 힘을 잃고 소멸하기 시작해. 이것은 마치 겨울내 집안을 따뜻하게 데워주던 보일러의 연료가 바닥나서 중심 화구가 서서히 꺼지는 과정과 같아. 세포 하나하나를 움직이던 미세한 열기들이 중심을 향해 수축하면서, 육체를 유지하던 근원적인 화력이 완전히 무너지게 되는 거지.</text:span><text:span/></text:p>
      <text:p text:style-name="P519"><text:span text:style-name="T1217">❄️ 식어가는 체온과 냉기의 전신 확산</text:span><text:span/></text:p>
      <text:p text:style-name="P520"><text:span text:style-name="T1218">불의 기운이 사라짐에 따라 외적인 변화로 몸의 따뜻한 열기가 급격하게 식어가게 돼. 뜨거운 주전자를 불 위에서 내려놓으면 공기 중으로 온기를 빼앗기며 차갑게 식어버리는 것처럼, 손끝과 발끝에서부터 시작된 냉기가 온몸으로 퍼져나가지. 생명의 온기가 떠나간 자리를 차가운 기운이 채우는 이 현상은 육신이 자연으로 돌아가고 있음을 알리는 자연스러운 신호야.</text:span><text:span/></text:p>
      <text:p text:style-name="P521"><text:span text:style-name="T1219">🍽️ 소화 능력의 상실과 장기 기능의 정지</text:span><text:span/></text:p>
      <text:p text:style-name="P522"><text:span text:style-name="T1220">몸 안의 화력이 꺼지면서 음식물과 음료를 분해하고 흡수하던 소화 기능도 완전히 정지해. 거대한 공장의 용광로가 식어버리면 아무리 좋은 원자재를 집어넣어도 더 이상 제품을 생산할 수 없는 것과 같은 이치야. 장기의 운동을 도와주던 미세한 열에너지가 멈추었기 때문에 육체는 더 이상 외부의 물질을 받아들여 생명력으로 전환할 수 없게 되지.</text:span><text:span/></text:p>
      <text:p text:style-name="P523"><text:span text:style-name="T1221">🌅 내면의 더 깊은 의식을 향한 해체</text:span><text:span/></text:p>
      <text:p text:style-name="P524"><text:span text:style-name="T1222">겉으로 보기에는 체온이 식고 소화력이 사라지는 파괴의 과정처럼 느껴지겠지만, 사실 이는 더 순수하고 미세한 의식의 세계로 진입하기 위한 필연적인 해체 단계야. 거친 육체적 대사 활동이 모두 멈춰야만 비로소 우리 마음속 깊은 곳에 숨겨진 명광의 지혜가 고개를 들 수 있거든. 따뜻한 봄을 맞이하기 위해 매서운 겨울의 한복판을 지나야 하는 것처럼 말이야.</text:span><text:span/></text:p>
      <text:p text:style-name="P525"><text:span text:style-name="T1223">📝 핵심 요약</text:span><text:span/></text:p>
      <text:list text:style-name="WWNum37" text:continue-numbering="true">
        <text:list-item>
          <text:p text:style-name="P526"><text:span text:style-name="T1224">불 원소의 소멸은 신체를 지탱하던 근원적인 생명 화력이 꺼지는 현상이다.</text:span><text:span/></text:p>
        </text:list-item>
        <text:list-item>
          <text:p text:style-name="P527"><text:span text:style-name="T1225">외적인 징후로 체온이 급격히 저하되며 손발 끝에서부터 냉기가 전신으로 확산된다.</text:span><text:span/></text:p>
        </text:list-item>
        <text:list-item>
          <text:p text:style-name="P528"><text:span text:style-name="T1226">소화 기관을 움직이던 에너지가 정지하여 음식물을 분해하는 능력을 완전히 상실한다.</text:span><text:span/></text:p>
        </text:list-item>
        <text:list-item>
          <text:p text:style-name="P529"><text:span text:style-name="T1227">이러한 거친 대사의 정지는 내면의 미세한 의식과 명광을 깨우기 위한 필수적인 비움이다.</text:span><text:span/></text:p>
        </text:list-item>
      </text:list>
      <text:p text:style-name="P530"><text:span><text:soft-page-break/></text:span><text:span/></text:p>
      <text:p text:style-name="P531"><text:span text:style-name="T1228">[🟢 Online Mode | 26.06.01_12:43:04]</text:span><text:span/></text:p>
      <text:p text:style-name="P532"><text:span text:style-name="T1229">28. 호흡의 멈춤과 코 감관이 닫히는 마지막 순간</text:span><text:span/></text:p>
      <text:p text:style-name="P533"><text:span text:style-name="T1230">🔑 핵심 키워드: 코 감관 소멸, 흡기 약화, 호기 연장, 숨의 중첩</text:span><text:span/></text:p>
      <text:p text:style-name="P534"><text:span text:style-name="T1231">👃 외부와 연결되던 숨길의 폐쇄</text:span><text:span/></text:p>
      <text:p text:style-name="P535"><text:span text:style-name="T1232">우리가 태어나서 지금까지 단 한 순간도 쉬지 않고 공기를 받아들이던 코의 감각 능력이 서서히 막을 내리는 단계야. 평생 외부 세계의 신선한 산소를 들이마시고 냄새를 맡으며 세상을 탐색하던 소중한 관문이 제 기능을 다하고 문을 닫는 외적 현상이지. 이것은 마치 오랜 시간 영업을 마치고 가게 뒤편의 메인 출입문을 서서히 걸어 잠그는 마감 시간과 아주 비슷해.</text:span><text:span/></text:p>
      <text:p text:style-name="P536"><text:span text:style-name="T1233">🎈 바람 빠진 풍선처럼 작아지는 들숨</text:span><text:span/></text:p>
      <text:p text:style-name="P537"><text:span text:style-name="T1234">이 단계에 접어들면 코로 공기를 체내로 끌어당기는 힘이 급격하게 약해져. 숨을 들이마시려고 해도 몸 안의 에너지가 부족해서 공기가 폐부 깊은 곳까지 도달하지 못하고 입구에서만 겨우 맴돌게 되지. 구멍 난 풍선에 아무리 바람을 불어넣으려 해도 제대로 부풀지 않고 힘없이 쪼그라드는 것처럼, 생명을 유지하기 위한 체내 흡입력이 한계에 다다랐음을 보여주는 신호야.</text:span><text:span/></text:p>
      <text:p text:style-name="P538"><text:span text:style-name="T1235">🪵 거칠게 밀려 나가는 마지막 날숨</text:span><text:span/></text:p>
      <text:p text:style-name="P539"><text:span text:style-name="T1236">반대로 몸 안에 남아 있던 공기를 밖으로 밀어내는 날숨은 평소보다 훨씬 거칠고 길게 밖으로 빠져나가게 돼. 들어오는 에너지는 거의 없는데 내보내는 흐름만 강해지다 보니 호흡의 밸런스가 완전히 깨어지는 거지. 마치 가득 찬 댐의 수문을 한 번에 열어젖혀 마지막 남은 물을 거세게 쏟아내는 것처럼, 몸속에 머물던 거친 물질적 기운을 외부로 한 번에 밀어내는 과정이라고 이해하면 돼.</text:span><text:span/></text:p>
      <text:p text:style-name="P540"><text:span text:style-name="T1237">⏳ 파도처럼 겹치며 멈추는 호흡의 중첩</text:span><text:span/></text:p>
      <text:p text:style-name="P541"><text:span text:style-name="T1238">결국 들숨과 날숨의 박자가 맞지 않으면서 마치 숨이 차곡차곡 위로 쌓이듯이 불규칙하게 겹쳐지는 현상이 일어나. 밀려오는 파도가 미처 빠져나가기 전에 다음 파도가 들이치며 엉키는 것처럼, 호흡이 정상적인 순환을 멈추고 헐떡이며 중첩되는 거지. 이 불규칙한 흐름은 우리 몸을 지탱하던 거친 숨의 고리가 완전히 끊어지고 더 미세한 내면의 의식 상태로 넘어가기 직전의 마지막 역동적인 변화야.</text:span><text:span/></text:p>
      <text:p text:style-name="P542"><text:span text:style-name="T1239">📝 핵심 요약</text:span><text:span/></text:p>
      <text:list text:style-name="WWNum38" text:continue-numbering="true">
        <text:list-item>
          <text:p text:style-name="P543"><text:span text:style-name="T1240">코의 감각 기능이 소멸하면서 외부 공기를 들이마시는 들숨의 힘이 급격히 약해짐.</text:span><text:span/></text:p>
        </text:list-item>
        <text:list-item>
          <text:p text:style-name="P544"><text:span text:style-name="T1241">몸 안의 잔류 공기를 밖으로 밀어내는 날숨은 평소보다 훨씬 거칠고 길어짐.</text:span><text:span/></text:p>
        </text:list-item>
        <text:list-item>
          <text:p text:style-name="P545"><text:span text:style-name="T1242">호흡의 균형이 깨지면서 숨이 서로 겹치고 쌓이는 독특한 중첩 현상이 일어남.</text:span><text:span/></text:p>
        </text:list-item>
        <text:list-item>
          <text:p text:style-name="P546"><text:span text:style-name="T1243">이는 거친 육체적 호흡이 마감되고 미세한 에너지 차원으로 이동하는 전환점임.</text:span><text:span/></text:p>
        </text:list-item>
      </text:list>
      <text:p text:style-name="P547"><text:span><text:soft-page-break/></text:span><text:span/></text:p>
      <text:p text:style-name="P548"><text:span text:style-name="T1244">29. 후각의 차단과 향취의 은멸</text:span><text:span/></text:p>
      <text:p text:style-name="P549"><text:span text:style-name="T1245">🔑 핵심 키워드: 내면의 향기, 후각 소멸, 비식, 향취 차단</text:span><text:span/></text:p>
      <text:p text:style-name="P550"><text:span text:style-name="T1246">👃 후각 기능의 마지막 정지</text:span><text:span/></text:p>
      <text:p text:style-name="P551"><text:span text:style-name="T1247">의식의 소멸 과정이 진행되면서 이번에는 마음에 귀속되어 있던 미세한 에너지인 내면의 향기가 완전히 은멸하는 단계에 접어들어. 이 시기가 되면 코라는 감각 기관이 외부의 자극을 받아들이는 통로로서의 기능을 완전히 멈추게 되지. 마치 잘 작동하던 공기청정기의 센서가 완전히 꺼져서 주변 공기의 오염이나 변화를 더 이상 감지하지 못하고 가만히 멈춰 서 있는 상태와 같아.</text:span><text:span/></text:p>
      <text:p text:style-name="P552"><text:span text:style-name="T1248">🌸 좋고 나쁨이 사라진 세계</text:span><text:span/></text:p>
      <text:p text:style-name="P553"><text:span text:style-name="T1249">이 단계의 가장 뚜렷한 외적 현상은 코가 향기의 좋고 나쁨을 전혀 맡지 못하게 된다는 점이야. 세상에는 향기로운 꽃향기도 있고 불쾌한 악취도 있지만 이 모든 분별이 순간적으로 사라져 버리지. 수많은 향수로 가득 찬 가게에 들어가서 온갖 향기를 코에 대도 아무런 냄새도 느끼지 못하는 완벽한 무취의 상태가 되는 셈이야.</text:span><text:span/></text:p>
      <text:p text:style-name="P554"><text:span text:style-name="T1250">🍃 거친 감각의 허물 벗기</text:span><text:span/></text:p>
      <text:p text:style-name="P555"><text:span text:style-name="T1251">밀교에서는 이를 거친 물질적 집착과 욕망에서 벗어나는 아주 필연적인 과정으로 바라봐. 평소 우리를 유혹하고 자극하던 세상의 수많은 냄새와 그에 따른 분별심이 힘을 잃는 단계지. 누에가 단단한 고치를 벗고 하늘을 날기 위해 자신의 껍질을 하나씩 떨어뜨리는 것처럼 영혼이 육체의 감각이라는 두터운 허물을 벗어던지는 중이라고 이해하면 돼.</text:span><text:span/></text:p>
      <text:p text:style-name="P556"><text:span text:style-name="T1252">🌌 더 깊은 의식의 심연으로</text:span><text:span/></text:p>
      <text:p text:style-name="P557"><text:span text:style-name="T1253">후각마저 소멸하면서 우리의 의식은 한층 더 깊은 내면의 세계로 침잠하게 돼. 바깥세상과 연결되어 있던 또 하나의 문이 닫히면서 이제 의식은 오직 순수한 중심만을 향해 나아가게 되지. 캄캄한 밤하늘에 마지막 가로등마저 툭 꺼지면서 주변의 모든 시선이 방 안의 작은 촛불 하나에만 집중되는 고요한 순간과 같아.</text:span><text:span/></text:p>
      <text:p text:style-name="P558"><text:span text:style-name="T1254">📝 핵심 요약</text:span><text:span/></text:p>
      <text:list text:style-name="WWNum39" text:continue-numbering="true">
        <text:list-item>
          <text:p text:style-name="P559"><text:span text:style-name="T1255">마음에 귀속되는 내면의 향기가 소멸하는 단계임</text:span><text:span/></text:p>
        </text:list-item>
        <text:list-item>
          <text:p text:style-name="P560"><text:span text:style-name="T1256">코가 향기의 좋고 나쁨을 전혀 인식하지 못하는 후각 차단이 일어남</text:span><text:span/></text:p>
        </text:list-item>
        <text:list-item>
          <text:p text:style-name="P561"><text:span text:style-name="T1257">외부의 거친 감각 자극과 냄새에 대한 분별심이 완전히 사라짐</text:span><text:span/></text:p>
        </text:list-item>
        <text:list-item>
          <text:p text:style-name="P562"><text:span text:style-name="T1258">의식이 육체의 한계를 벗어나 더 깊은 내면의 고요로 진입하는 과정임</text:span><text:span/></text:p>
        </text:list-item>
      </text:list>
      <text:p text:style-name="P563"><text:span><text:soft-page-break/></text:span><text:span/></text:p>
      <text:p text:style-name="P564"><text:span text:style-name="T1259">30. 오원소가 사라질 때 나타나는 내면의 불꽃 현상</text:span><text:span/></text:p>
      <text:p text:style-name="P565"><text:span text:style-name="T1260">🔑 핵심 키워드: 오원소 은멸, 내적 현상, 반딧불 환영, 연기 속 불티, 그을음 불꽃</text:span><text:span/></text:p>
      <text:p text:style-name="P566"><text:span text:style-name="T1261">🌌 외부 세계가 닫히고 열리는 내면의 무대</text:span><text:span/></text:p>
      <text:p text:style-name="P567"><text:span text:style-name="T1262">우리를 구성하는 다섯 가지 원소가 서서히 힘을 잃고 숨어버리는 은멸의 단계에 접어들면, 우리의 의식 속에는 아주 신비로운 내적 현상들이 일어나기 시작해. 이것은 마치 밤이 깊어 바깥 세상의 소음과 화려한 네온사인이 모두 꺼진 뒤, 방 안의 조그만 전자기기 유도등이 하나둘 선명하게 눈에 들어오는 과정과 같단다. 외부로 향해 있던 오감의 통로가 완전히 차단되면서, 오직 내면의 거울에만 비치는 아주 미세하고 독특한 시각적 신호들이 마음의 무대를 채우게 되는 거</text:span><text:span text:style-name="T1263">지.</text:span><text:span/></text:p>
      <text:p text:style-name="P568"><text:span text:style-name="T1264">🪰 어두운 밤하늘을 기억하는 반딧불의 반짝임</text:span><text:span/></text:p>
      <text:p text:style-name="P569"><text:span text:style-name="T1265">이 깊은 내면의 무대에서 가장 먼저 마주하는 풍경은 바로 밤하늘에 은은하게 반짝이는 반딧불과 같은 모습이야. 칠흑 같은 어둠 속에서 조용히 빛을 발하며 떠다니는 반딧불 무리처럼, 수행자의 의식 속에서 미세한 빛방울들이 깜빡이며 나타났다 사라지기를 반복해. 이는 거친 거시적 에너지가 소멸하고 가장 본질적이고 미세한 정신적 영역으로 의식이 이동하고 있음을 보여주는 첫 번째 신호라고 볼 수 있어.</text:span><text:span/></text:p>
      <text:p text:style-name="P570"><text:span text:style-name="T1266">💨 뭉글뭉글 피어오르는 연기 속의 빨간 불티</text:span><text:span/></text:p>
      <text:p text:style-name="P571"><text:span text:style-name="T1267">그다음으로 나타나는 환영은 마치 시골집 굴뚝에서 검은 연기가 뭉글뭉글 솟아오를 때, 그 연기 사이에 박혀 함께 피어오르는 빨간 불티와 같은 현상이야. 어두운 배경 속에서 붉은빛을 띠는 미세한 에너지가 역동적으로 움직이는 모양새를 띠지. 우리가 캠프파이어를 할 때 장작이 타들어 가면서 공중으로 탁탁 튀어 올라가는 작은 불꽃송이들을 바라보는 것처럼, 의식의 깊은 바닥에서 잠재되어 있던 에너지가 마지막으로 불꽃을 피워내며 정화되는 모습과도 닮아 있어.</text:span><text:span/></text:p>
      <text:p text:style-name="P572"><text:span text:style-name="T1268">🍳 가마솥 바닥 그을음에서 튀어오르는 불꽃</text:span><text:span/></text:p>
      <text:p text:style-name="P573"><text:span text:style-name="T1269">마지막으로 묘사되는 내적 징후는 곡식을 볶을 때 쓰는 무쇠솥이나 가마솥 뒤편의 까만 그을음에서 빨간 불티가 번쩍하며 튀어 오르는 것과 같은 현상이야. 검은 그을음이라는 짙은 어둠을 바탕으로 하여, 아주 선명하고 날카로운 붉은 빛의 스파크가 순간적으로 일어나는 모습이지. 이는 모든 감각과 에너지가 완전히 소멸하기 직전, 의식의 가장 깊은 곳에서 일어나는 마지막 에너지의 요동이자 완전히 새로운 차원으로 넘어가기 직전의 극적인 순간을 상징한단다.</text:span><text:span/></text:p>
      <text:p text:style-name="P574"><text:span text:style-name="T1270">📝 핵심 요약</text:span><text:span/></text:p>
      <text:list text:style-name="WWNum40" text:continue-numbering="true">
        <text:list-item>
          <text:p text:style-name="P575"><text:span text:style-name="T1271">다섯 가지 원소가 소멸하는 은멸 단계에서는 오직 의식 안에서만 느껴지는 신비로운 내적 현상이 일어난다.</text:span><text:span/></text:p>
        </text:list-item>
        <text:list-item>
          <text:p text:style-name="P576"><text:span text:style-name="T1272">첫 번째 징후는 칠흑 같은 어둠 속에서 은은하게 깜빡이며 떠다니는 반딧불과 같은 형태의 환영이다.</text:span><text:span/></text:p>
        </text:list-item>
        <text:list-item>
          <text:p text:style-name="P577"><text:span text:style-name="T1273">두 번째 징후는 굴뚝에서 솟구치는 짙은 연기 사이에 붉게 박혀서 피어오르는 작은 불티의 모습이다.</text:span><text:span/></text:p>
        </text:list-item>
        <text:list-item>
          <text:p text:style-name="P578"><text:span text:style-name="T1274">세 번째 징후는 무쇠솥 뒤편의 새까만 그을음 속에서 순간적으로 번쩍이며 튀어 오르는 빨간 불꽃이다.</text:span><text:span/></text:p>
        </text:list-item>
      </text:list>
      <text:p text:style-name="P579"><text:span><text:soft-page-break/></text:span><text:span/></text:p>
      <text:p text:style-name="P580"><text:span text:style-name="T1275">[🟢 Online Mode | 26.06.01_12:45:01]</text:span><text:span/></text:p>
      <text:p text:style-name="P581"><text:span text:style-name="T1276">31. 행온의 은멸과 육체적 움직임의 완전한 정지</text:span><text:span/></text:p>
      <text:p text:style-name="P582"><text:span text:style-name="T1277">🔑 핵심 키워드: 행온의 소멸, 다섯 원소의 은멸, 외적 현상, 신체 움직임 정지</text:span><text:span/></text:p>
      <text:p text:style-name="P583"><text:span text:style-name="T1278">⚙️ 동력 장치의 일제히 셧다운</text:span><text:span/></text:p>
      <text:p text:style-name="P584"><text:span text:style-name="T1279">행온은 우리 몸과 마음을 끊임없이 움직이게 만드는 보이지 않는 거대한 동력 장치와 같아. 마치 정밀한 공장의 메인 전원 스위치를 내리면 수많은 기계 부품과 컨베이어 벨트가 순식간에 멈춰 서는 것처럼, 이 단계에 이르면 행온의 부류에 속하는 다섯 가지 원소들의 에너지가 동시에 사라지게 돼. 몸을 제어하던 모든 내부 시스템이 일제히 가동을 중단하는 결정적인 순간이지.</text:span><text:span/></text:p>
      <text:p text:style-name="P585"><text:span text:style-name="T1280">🛑 조종간이 먹통이 된 비행기</text:span><text:span/></text:p>
      <text:p text:style-name="P586"><text:span text:style-name="T1281">이 현상이 일어나면 겉으로 드러나는 가장 뚜렷한 신호는 바로 몸을 전혀 움직일 수 없게 된다는 점이야. 아무리 베테랑 조종사라 하더라도 비행기의 유압 시스템과 조종간 연결선이 완전히 끊어지면 날개를 제어할 수 없는 것과 같은 이치지. 손가락 하나 까딱하고 싶어도 마음의 명령이 육체로 전달되는 통로가 완전히 끊겨버려 온몸이 무겁게 고정돼.</text:span><text:span/></text:p>
      <text:p text:style-name="P587"><text:span text:style-name="T1282">🧵 인형의 실이 끊어지는 순간</text:span><text:span/></text:p>
      <text:p text:style-name="P588"><text:span text:style-name="T1283">우리가 평소에 걷고, 뛰고, 손짓하는 모든 행위는 행온이라는 미세한 실들이 육체를 조종하고 있었기 때문에 가능했던 일이야. 무대 위에서 화려하게 춤추던 마리오네트 인형의 실을 가위로 한꺼번에 싹둑 잘라버리면 인형이 그 자리에 주저앉아 더 이상 아무런 동작도 하지 못하듯이, 육체는 스스로 움직이는 힘을 완전히 잃고 우주의 중력에 그대로 순응하게 되지.</text:span><text:span/></text:p>
      <text:p text:style-name="P589"><text:span text:style-name="T1284">⏳ 물질 세계와의 마지막 작별</text:span><text:span/></text:p>
      <text:p text:style-name="P590"><text:span text:style-name="T1285">결국 이 움직임의 정지는 육체가 물리적 세계에서 행할 수 있는 모든 유효한 활동이 최종적으로 막을 내렸음을 의미해. 태엽을 끝까지 감아두었던 장난감 자동차의 태엽이 완전히 풀려 제자리에 우뚝 멈춰 서는 것처럼, 행온의 소멸은 육신이라는 도구를 통한 물질적 소통이 완전히 끝났음을 보여주는 명확한 신호야. 이제 의식은 더 깊은 내면의 영역으로 이동할 준비를 하게 돼.</text:span><text:span/></text:p>
      <text:p text:style-name="P591"><text:span text:style-name="T1286">📝 핵심 요약</text:span><text:span/></text:p>
      <text:list text:style-name="WWNum41" text:continue-numbering="true">
        <text:list-item>
          <text:p text:style-name="P592"><text:span text:style-name="T1287">행온은 몸과 마음을 움직이게 만드는 근본적인 동력 시스템이야.</text:span><text:span/></text:p>
        </text:list-item>
        <text:list-item>
          <text:p text:style-name="P593"><text:span text:style-name="T1288">행온에 속하는 다섯 가지 원소들이 동시에 은멸하면서 내부 제어 장치가 꺼져.</text:span><text:span/></text:p>
        </text:list-item>
        <text:list-item>
          <text:p text:style-name="P594"><text:span text:style-name="T1289">외적인 신호로 마리오네트 인형의 실이 끊기듯 몸의 모든 움직임이 완전히 멈춰.</text:span><text:span/></text:p>
        </text:list-item>
        <text:list-item>
          <text:p text:style-name="P595"><text:span text:style-name="T1290">이는 육체를 통한 물리적 활동의 최종 종료이자 더 깊은 내면으로 들어가는 단계야.</text:span><text:span/></text:p>
        </text:list-item>
      </text:list>
      <text:p text:style-name="P596"><text:span><text:soft-page-break/></text:span><text:span/></text:p>
      <text:p text:style-name="P597"><text:span text:style-name="T1291">32. 성소작지의 소멸과 세상사로부터의 초연</text:span><text:span/></text:p>
      <text:p text:style-name="P598"><text:span text:style-name="T1292">🔑 핵심 키워드: 성소작지, 소멸 현상, 세상일의 망각, 기억의 해체</text:span><text:span/></text:p>
      <text:p text:style-name="P599"><text:span text:style-name="T1293">📅 삶의 모든 계획을 관리하던 똑똑한 플래너</text:span><text:span/></text:p>
      <text:p text:style-name="P600"><text:span text:style-name="T1294">성소작지는 우리가 이 세상을 살아가면서 해야 할 일, 이루어야 할 목표, 그리고 세상에서 필요한 여러 가지 활동들을 기억하고 실행하도록 돕는 지혜야. 스마트폰에 깔린 만능 스케줄러나 다이어리 앱처럼, 매일의 할 일 목록을 꼼꼼하게 챙겨주던 우리 마음의 유능한 비서 같은 존재라고 볼 수 있지.</text:span><text:span/></text:p>
      <text:p text:style-name="P601"><text:span text:style-name="T1295">🔌 세상이라는 무대의 전원을 끄는 일</text:span><text:span/></text:p>
      <text:p text:style-name="P602"><text:span text:style-name="T1296">죽음의 과정이 깊어지면서 이 성소작지가 서서히 소멸의 단계로 접어들게 돼. 이것은 마치 회사를 완전히 퇴직하면서 그동안 쓰던 업무용 계정을 로그아웃하고 노트북을 반납하는 과정과 비슷해. 이제 더 이상 세간의 일상적인 규칙이나 생업에 얽매일 필요가 없기 때문에, 마음이 그 도구를 내려놓는 자연스러운 현상이야.</text:span><text:span/></text:p>
      <text:p text:style-name="P603"><text:span text:style-name="T1297">🌬️ 기억의 서랍이 하얗게 비워지는 현상</text:span><text:span/></text:p>
      <text:p text:style-name="P604"><text:span text:style-name="T1298">성소작지가 소멸할 때 겉으로 드러나는 명확한 변화는 세상의 모든 일과 계획들을 전혀 기억하지 못하게 된다는 점이야. 빽빽하게 적혀 있던 화이트보드의 일정을 지우개로 싹 밀어버린 것처럼, 돈을 벌거나 집을 가꾸거나 내일 무엇을 해야 한다는 세상 속의 목적과 필요들이 머릿속에서 완벽하게 사라져 버리지.</text:span><text:span/></text:p>
      <text:p text:style-name="P605"><text:span text:style-name="T1299">🕊️ 모든 짐을 내려놓고 맞이하는 진정한 자유</text:span><text:span/></text:p>
      <text:p text:style-name="P606"><text:span text:style-name="T1300">이 세상의 기억들을 모두 잊어버리는 것은 결코 두려운 일이 아니라, 영혼이 거대하고 무거운 배낭을 마침내 내려놓는 순간이야. 세상에 대한 집착과 의무의 끈을 모두 놓아버림으로써, 우리의 의식은 그 어떤 방해도 받지 않고 오롯이 내면의 가장 깊고 순수한 본질을 향해 가볍게 날아오를 수 있는 완벽한 자유를 얻게 돼.</text:span><text:span/></text:p>
      <text:p text:style-name="P607"><text:span text:style-name="T1301">📝 핵심 요약</text:span><text:span/></text:p>
      <text:list text:style-name="WWNum42" text:continue-numbering="true">
        <text:list-item>
          <text:p text:style-name="P608"><text:span text:style-name="T1302">성소작지는 세상의 활동과 목표, 필요한 일들을 기억하고 관리하는 마음의 지혜이다.</text:span><text:span/></text:p>
        </text:list-item>
        <text:list-item>
          <text:p text:style-name="P609"><text:span text:style-name="T1303">죽음의 과정에서 성소작지가 소멸하면 세간의 모든 기억과 계획을 내려놓게 된다.</text:span><text:span/></text:p>
        </text:list-item>
        <text:list-item>
          <text:p text:style-name="P610"><text:span text:style-name="T1304">외적인 징후로 세상의 비즈니스나 일상적인 목적들을 전혀 기억하지 못하는 현상이 나타난다.</text:span><text:span/></text:p>
        </text:list-item>
        <text:list-item>
          <text:p text:style-name="P611"><text:span text:style-name="T1305">세상일의 망각은 집착을 끊고 의식이 더 깊은 내면의 여정으로 나아가게 돕는 해방의 단계이다.</text:span><text:span/></text:p>
        </text:list-item>
      </text:list>
      <text:p text:style-name="P612"><text:span><text:soft-page-break/></text:span><text:span/></text:p>
      <text:p text:style-name="P613"><text:span text:style-name="T1306">[🔴 Offline Mode | 26.06.01_12:45:13]</text:span><text:span/></text:p>
      <text:p text:style-name="P614"><text:span text:style-name="T1307">33. 바람 원소의 소멸과 호흡의 중단</text:span><text:span/></text:p>
      <text:p text:style-name="P615"><text:span text:style-name="T1308">🔑 핵심 키워드: 바람 원소, 지명풍, 열 가지 바람, 심장 이동, 호흡 정지</text:span><text:span/></text:p>
      <text:p text:style-name="P616"><text:span text:style-name="T1309">🌬️ 생명의 숨결인 바람 원소의 수축</text:span><text:span/></text:p>
      <text:p text:style-name="P617"><text:span text:style-name="T1310">우리 몸을 움직이게 만들던 가장 역동적인 에너지인 바람 원소가 마침내 소멸의 단계에 접어들게 돼. 바람 원소는 우리 몸 안에서 호흡을 주관하고 모든 순환과 움직임을 일으키는 보이지 않는 원동력이야. 마치 온 사방으로 힘차게 불어오던 거센 바람이 서서히 힘을 잃고 한곳으로 모여드는 것처럼, 몸 구석구석을 활기차게 채우고 있던 생명의 에너지가 서서히 중심부로 수축하기 시작하는 단계라고 볼 수 있어.</text:span><text:span/></text:p>
      <text:p text:style-name="P618"><text:span text:style-name="T1311">🫀 열 가지 바람의 심장 집결</text:span><text:span/></text:p>
      <text:p text:style-name="P619"><text:span text:style-name="T1312">이 과정에서 직접적인 생명을 유지하는 가장 근본적인 에너지인 지명풍을 포함해, 우리 몸의 각 부위를 담당하던 열 가지 종류의 바람들이 원래 머물던 자신들의 자리에서 떠나게 돼. 사방으로 흩어져 각자의 임무를 수행하던 정예 부대원들이 대장의 마지막 명령을 받고 본부인 심장을 향해 일제히 모여드는 것과 같은 이치야. 온몸을 순환하던 미세한 기운들이 마지막 불꽃을 태우기 위해 존재의 가장 깊은 방인 심장으로 집중되는 신비로운 현상이란다.</text:span><text:span/></text:p>
      <text:p text:style-name="P620"><text:span text:style-name="T1313">🛑 내부적 집결이 가져오는 호흡의 정지</text:span><text:span/></text:p>
      <text:p text:style-name="P621"><text:span text:style-name="T1314">열 가지 바람이 모두 심장이라는 하나의 초점으로 모여들면, 마침내 겉으로 드러나는 가장 결정적인 외적 현상이 나타나는데 그것이 바로 호흡의 끊어짐이야. 우리가 태어난 그 첫 순간부터 단 한 번도 쉬지 않고 공기를 들이마시고 내쉬던 허파의 운동이 완전히 멈추게 되는 거지. 늘 분주하게 돌아가던 거대한 공장의 메인 모터가 꺼지면서 전원 공급이 차단되듯, 들숨과 날숨의 오고 감이 완벽하게 멈추며 물질적인 생명의 활동이 마침표를 찍게 돼.</text:span><text:span/></text:p>
      <text:p text:style-name="P622"><text:span text:style-name="T1315">⏳ 물질적 존재의 마지막 관문</text:span><text:span/></text:p>
      <text:p text:style-name="P623"><text:span text:style-name="T1316">숨이 멈춘다는 것은 바람 원소가 외부 세계와의 모든 물리적 교류를 마감했음을 뜻해. 대지와 소통하던 단단함이 무너지고, 소리가 사라진 침묵을 지나, 이제는 생명 활동의 가장 핵심인 숨결까지 심장 안으로 거두어들인 거야. 이는 외부로 향해 있던 거대한 에너지가 완전히 내부의 심연으로 침잠하여, 육체라는 낡은 옷을 벗고 한 차원 더 높은 정신적 순수의 상태로 넘어가기 위한 마지막 준비 과정을 마쳤음을 의미한단다.</text:span><text:span/></text:p>
      <text:p text:style-name="P624"><text:span text:style-name="T1317">📝 핵심 요약</text:span><text:span/></text:p>
      <text:list text:style-name="WWNum43" text:continue-numbering="true">
        <text:list-item>
          <text:p text:style-name="P625"><text:span text:style-name="T1318">우리 몸의 모든 움직임과 순환을 주관하던 바람 원소가 소멸의 단계를 맞이함.</text:span><text:span/></text:p>
        </text:list-item>
        <text:list-item>
          <text:p text:style-name="P626"><text:span text:style-name="T1319">생명을 직접 유지하는 지명풍을 비롯한 열 가지 바람이 각자의 위치에서 심장으로 이동함.</text:span><text:span/></text:p>
        </text:list-item>
        <text:list-item>
          <text:p text:style-name="P627"><text:span text:style-name="T1320">몸 안의 기운들이 심장으로 모두 모여들면서 들숨과 날숨의 호흡이 완전히 끊어짐.</text:span><text:span/></text:p>
        </text:list-item>
        <text:list-item>
          <text:p text:style-name="P628"><text:span text:style-name="T1321">외부 세계와의 물리적인 호흡을 마감하고 의식이 깊은 내면의 중심으로 침잠함.</text:span><text:span/></text:p>
        </text:list-item>
      </text:list>
      <text:p text:style-name="P629"><text:span><text:soft-page-break/></text:span><text:span/></text:p>
      <text:p text:style-name="P630"><text:span text:style-name="T1322">34. 혀 감관의 소멸과 내적 수렴의 시작</text:span><text:span/></text:p>
      <text:p text:style-name="P631"><text:span text:style-name="T1323">🔑 핵심 키워드: 혀 감관 소멸, 설근 변화, 미각 상실, 에너지 수렴</text:span><text:span/></text:p>
      <text:p text:style-name="P632"><text:span text:style-name="T1324">👅 감각 통로의 폐쇄와 에너지 회수</text:span><text:span/></text:p>
      <text:p text:style-name="P633"><text:span text:style-name="T1325">우리가 맛을 느끼고 말을 할 수 있도록 도와주던 혀의 감각 에너지가 마침내 중심 맥으로 거두어지는 단계야. 평소에는 음식을 즐기고 소통하는 가장 활발한 통로였지만, 죽음의 과정에 이르러 외부를 향했던 안테나가 제 역할을 마치고 안으로 접히는 현상이지. 생소하고 낯선 변화처럼 보이지만 자연이 가을을 맞아 스스로를 갈무리하는 것처럼 지극히 순리적인 흐름이야.</text:span><text:span/></text:p>
      <text:p text:style-name="P634"><text:span text:style-name="T1326">🪵 부풀고 오므라드는 신체적 변화</text:span><text:span/></text:p>
      <text:p text:style-name="P635"><text:span text:style-name="T1327">혀가 부풀어 오르고 안으로 오므라드는 모습은 마치 물기가 빠진 나뭇잎이 가장자리를 향해 돌르르 말려 들어가거나, 활짝 피었던 꽃잎이 밤이 되어 중심을 향해 오므라드는 것과 같아. 생명 에너지가 육체의 말단에서부터 중심부로 강하게 이끌려 들어가면서 나타나는 자연스러운 수축 반응이지. 외부로 발산되던 거친 기운들이 내면 깊숙이 모여들고 있다는 증거이기도 해.</text:span><text:span/></text:p>
      <text:p text:style-name="P636"><text:span text:style-name="T1328">💙 차갑게 변하는 혀뿌리의 신호</text:span><text:span/></text:p>
      <text:p text:style-name="P637"><text:span text:style-name="T1329">혀뿌리가 시퍼렇게 변하는 외적 현상은 육체의 온기가 사라지고 물질적 생명 활동이 차단되었음을 보여주는 명확한 신호야. 기계의 전원 플러그를 뽑으면 따뜻했던 온기가 순식간에 식어 내리며 차가운 금속 고유의 색만 남는 것처럼, 육체의 가장 깊은 통로에서부터 물질 세상과의 연결이 마무리되고 있음을 직관적으로 보여주는 상태야.</text:span><text:span/></text:p>
      <text:p text:style-name="P638"><text:span text:style-name="T1330">🚪 외부 소통의 완전한 마감</text:span><text:span/></text:p>
      <text:p text:style-name="P639"><text:span text:style-name="T1331">이 단계에 이르면 맛을 인지하는 미각의 세계뿐만 아니라 소리를 내어 의사를 표현하는 언어의 문이 완전히 닫히게 돼. 외부 세계를 향해 열려 있던 감각의 창문들을 모두 걸어 잠그고, 오직 내면의 청정한 의식 세계로 진입하기 위해 완벽한 고요 속으로 들어가는 성스러운 전환점이라고 볼 수 있어.</text:span><text:span/></text:p>
      <text:p text:style-name="P640"><text:span text:style-name="T1332">📝 핵심 요약</text:span><text:span/></text:p>
      <text:list text:style-name="WWNum44" text:continue-numbering="true">
        <text:list-item>
          <text:p text:style-name="P641"><text:span text:style-name="T1333">맛과 언어를 담당하던 혀의 감각 에너지가 육체의 중심 맥으로 완전히 회수됨</text:span><text:span/></text:p>
        </text:list-item>
        <text:list-item>
          <text:p text:style-name="P642"><text:span text:style-name="T1334">꽃잎이 밤에 오므라들듯 생명 에너지가 수렴되면서 혀가 부풀고 안으로 말려 들어감</text:span><text:span/></text:p>
        </text:list-item>
        <text:list-item>
          <text:p text:style-name="P643"><text:span text:style-name="T1335">전원이 꺼진 기계가 식어 내리듯 혀뿌리가 시퍼렇게 변하며 물질적 활동의 정지를 알림</text:span><text:span/></text:p>
        </text:list-item>
        <text:list-item>
          <text:p text:style-name="P644"><text:span text:style-name="T1336">외부 세계와의 감각적 소통이 완전히 마감되고 내면의 미세한 의식 영역으로 진입함</text:span><text:span/></text:p>
        </text:list-item>
      </text:list>
      <text:p text:style-name="P645"><text:span><text:soft-page-break/></text:span><text:span/></text:p>
      <text:p text:style-name="P646"><text:span text:style-name="T1337">[🟢 Online Mode | 26.06.01_12:45:26]</text:span><text:span/></text:p>
      <text:p text:style-name="P647"><text:span text:style-name="T1338">35. 내미의 소멸과 미각의 상실</text:span><text:span/></text:p>
      <text:p text:style-name="P648"><text:span text:style-name="T1339">🔑 핵심 키워드: 내미 소멸, 육미 상실, 미각 차단, 감각 해체</text:span><text:span/></text:p>
      <text:p text:style-name="P649"><text:span text:style-name="T1340">👅 미각 영토의 영구적 폐쇄</text:span><text:span/></text:p>
      <text:p text:style-name="P650"><text:span text:style-name="T1341">우리 마음과 신체에 귀속되어 맛을 느끼게 하던 내면의 미각 에너지가 완전히 소멸하는 단계야. 비유하자면 평생 동안 온갖 화려한 요리를 만들어내며 손님을 맞이하던 최고급 레스토랑의 주방이 문을 닫고 모든 전등을 꺼버리는 것과 같지. 이 감각의 뿌리가 사라지면서 외부의 음식을 인식하고 받아들이던 영혼의 통로가 완전히 차단되는 경험을 하게 돼.</text:span><text:span/></text:p>
      <text:p text:style-name="P651"><text:span text:style-name="T1342">🚫 여섯 가지 맛의 동시 증발</text:span><text:span/></text:p>
      <text:p text:style-name="P652"><text:span text:style-name="T1343">세상의 모든 풍미를 구성하던 여섯 가지 맛이 일시에 감각의 세계에서 흔적도 없이 사라지게 돼.</text:span><text:span/></text:p>
      <text:list text:style-name="WWNum45" text:continue-numbering="true">
        <text:list-item>
          <text:p text:style-name="P653"><text:span text:style-name="T1344">단맛과 신맛: 혀끝을 자극하던 달콤함과 상큼함의 감각이 사라짐</text:span><text:span/></text:p>
        </text:list-item>
        <text:list-item>
          <text:p text:style-name="P654"><text:span text:style-name="T1345">쓴맛과 떫은맛: 입안을 감돌던 쌉싸름함과 텁텁함이 느껴지지 않음</text:span><text:span/></text:p>
        </text:list-item>
        <text:list-item>
          <text:p text:style-name="P655"><text:span text:style-name="T1346">매운맛과 짠맛: 미각을 깨우던 강렬한 자극과 간이 모두 무로 돌아감</text:span><text:span/></text:p>
        </text:list-item>
        <text:list-item>
          <text:p text:style-name="P656"><text:span text:style-name="T1347">마치 화려한 천연색으로 가득했던 풍경화 위에 갑자기 검은 먹물이 쏟아져서 그 어떤 색채도 구별할 수 없게 된 먹먹한 상태와 똑같아.</text:span><text:span/></text:p>
        </text:list-item>
      </text:list>
      <text:p text:style-name="P657"><text:span text:style-name="T1348">🪵 무감각의 모래를 씹는 의식</text:span><text:span/></text:p>
      <text:p text:style-name="P658"><text:span text:style-name="T1349">이제 어떤 음식을 입에 넣어도 그것은 더 이상 음식이 아니라 그저 아무런 자극도 없는 메마른 흙덩이나 나무토막처럼 느껴질 뿐이야. 혀라는 신체 기관은 물리적으로 남아있지만 정신적인 감각 네트워크와의 연결이 완전히 끊어졌기 때문이지. 바다 깊은 곳에 가라앉은 난파선의 무전기가 더 이상 아무런 신호도 보내지 못하는 것처럼 미각의 신호체계가 완전히 종료된 상태야.</text:span><text:span/></text:p>
      <text:p text:style-name="P659"><text:span text:style-name="T1350">📝 핵심 요약</text:span><text:span/></text:p>
      <text:list text:style-name="WWNum45" text:continue-numbering="true">
        <text:list-item>
          <text:p text:style-name="P660"><text:span text:style-name="T1351">마음에 귀속되어 맛을 식별하던 내면의 미각 원소인 내미가 완전히 소멸함.</text:span><text:span/></text:p>
        </text:list-item>
        <text:list-item>
          <text:p text:style-name="P661"><text:span text:style-name="T1352">단맛, 신맛, 쓴맛, 떫은맛, 매운맛, 짠맛의 여섯 가지 미각이 전부 동시에 정지됨.</text:span><text:span/></text:p>
        </text:list-item>
        <text:list-item>
          <text:p text:style-name="P662"><text:span text:style-name="T1353">혀의 물리적 형태만 남고 정신적 네트워크가 차단되어 완전한 무감각 상태에 이름.</text:span><text:span/></text:p>
        </text:list-item>
        <text:list-item>
          <text:p text:style-name="P663"><text:span text:style-name="T1354">외부 세상과 소통하던 또 하나의 거대한 감각의 문이 닫히며 해체가 심화됨.</text:span><text:span/></text:p>
        </text:list-item>
      </text:list>
      <text:p text:style-name="P664"><text:span><text:soft-page-break/></text:span><text:span/></text:p>
      <text:p text:style-name="P665"><text:span text:style-name="T1355">36. 신근의 소멸과 촉각의 해체</text:span><text:span/></text:p>
      <text:p text:style-name="P666"><text:span text:style-name="T1356">🔑 핵심 키워드: 신근 소멸, 촉감 상실, 감각 단절, 신체 해체, 내면 침잠</text:span><text:span/></text:p>
      <text:p text:style-name="P667"><text:span text:style-name="T1357">📱 신체 센서의 완전한 전원 오프</text:span><text:span/></text:p>
      <text:p text:style-name="P668"><text:span text:style-name="T1358">우리 몸 전체를 감싸고 있던 가장 넓은 감각 기관인 몸 감관이 마침내 소멸 단계에 접어들게 돼. 이것은 마치 온갖 정밀한 터치 센서가 달린 최신형 스마트폰이 방전되기 직전, 배터리를 아끼기 위해 외부 터치 인식 기능부터 가장 먼저 차단하는 것과 같아. 외부의 자극을 받아들이던 거대한 피부 안테나가 작동을 멈추면서, 몸은 외부 세계를 물리적으로 인지하는 능력을 완전히 상실하게 되지.</text:span><text:span/></text:p>
      <text:p text:style-name="P669"><text:span text:style-name="T1359">🧤 거침과 부드러움의 경계 붕괴</text:span><text:span/></text:p>
      <text:p text:style-name="P670"><text:span text:style-name="T1360">이 단계에서 나타나는 확실한 외적 현상은 피부에 와닿는 그 어떤 촉감도 느끼지 못한다는 점이야. 비단결처럼 부드러운 천을 만지든, 모래알처럼 거친 바닥을 만지든 아무런 차이를 알 수 없게 돼. 아주 두꺼운 우주복 장갑을 겹겹이 끼고 물건을 만지는 바람에 손끝에 전달되는 모든 질감이 완전히 먹통이 되어버린 상태를 상상하면 이해하기 쉬울 거야.</text:span><text:span/></text:p>
      <text:p text:style-name="P671"><text:span text:style-name="T1361">촉각 정보의 차단 상태:</text:span><text:span/></text:p>
      <text:list text:style-name="WWNum46" text:continue-numbering="true">
        <text:list-item>
          <text:p text:style-name="P672"><text:span text:style-name="T1362">미세한 감각: 부드러움이나 매끄러움 인지 불가</text:span><text:span/></text:p>
        </text:list-item>
        <text:list-item>
          <text:p text:style-name="P673"><text:span text:style-name="T1363">거친 감각: 딱딱함이나 거칠음 인지 불가</text:span><text:span/></text:p>
        </text:list-item>
      </text:list>
      <text:p text:style-name="P674"><text:span text:style-name="T1364">🌊 나와 세계를 나누던 벽의 소멸</text:span><text:span/></text:p>
      <text:p text:style-name="P675"><text:span text:style-name="T1365">촉감이 사라진다는 것은 단순히 만지는 느낌이 없어지는 것을 넘어, 내 몸과 외부 세계를 나누던 마지막 경계선이 허물어짐을 뜻해. 얼음 인형이 따뜻한 물속에 들어가 서서히 녹으면서 어디까지가 인형이고 어디부터가 주변의 물인지 구분이 모호해지는 과정과 비슷하지. 나와 물리적 세계를 갈라놓았던 피부라는 단단한 벽이 힘을 잃으면서, 물질세계와의 물리적인 작별이 비로소 완성되는 거야.</text:span><text:span/></text:p>
      <text:p text:style-name="P676"><text:span text:style-name="T1366">✈️ 오롯이 내면으로 향하는 마지막 비행</text:span><text:span/></text:p>
      <text:p text:style-name="P677"><text:span text:style-name="T1367">앞서 눈 감관이 닫힌 것에 이어 촉각마저 완전히 사라지면, 의식은 이제 외부 세계의 그 어떤 자극이나 방해도 받지 않는 완벽한 고립 상태로 들어가게 돼. 비행기가 짙은 안개 속에서 외부 시야를 완전히 차단한 채 오직 내부 계기판의 신호만 보며 비행하는 것처럼, 우리 의식도 밖으로 향하던 모든 에너지를 거두어 가장 깊고 고요한 중심부로 침잠할 준비를 마치게 되는 지점이야.</text:span><text:span/></text:p>
      <text:p text:style-name="P678"><text:span text:style-name="T1368">📝 핵심 요약</text:span><text:span/></text:p>
      <text:list text:style-name="WWNum46" text:continue-numbering="true">
        <text:list-item>
          <text:p text:style-name="P679"><text:span text:style-name="T1369">이 단계에서는 몸 전체의 촉각을 담당하는 몸 감관과 촉감이 동시에 소멸한다.</text:span><text:span/></text:p>
        </text:list-item>
        <text:list-item>
          <text:p text:style-name="P680"><text:span text:style-name="T1370">외적 징후로 거칠거나 부드러운 물질적 질감을 전혀 느끼지 못하는 상태가 된다.</text:span><text:span/></text:p>
        </text:list-item>
        <text:list-item>
          <text:p text:style-name="P681"><text:span text:style-name="T1371">이는 내 몸과 외부 세계를 구분하던 피부의 경계선이 완벽하게 허물어짐을 의미한다.</text:span><text:span/></text:p>
        </text:list-item>
        <text:list-item>
          <text:p text:style-name="P682"><text:span text:style-name="T1372">외부 자극이 모두 차단됨에 따라 의식은 온전히 깊은 내면의 세계로 가라앉는다.</text:span><text:span/></text:p>
        </text:list-item>
      </text:list>
      <text:p text:style-name="P683"><text:span><text:soft-page-break/></text:span><text:span/></text:p>
      <text:p text:style-name="P684"><text:span text:style-name="T1373">[🟢 Online Mode | 26.06.01_12:46:12]</text:span><text:span/></text:p>
      <text:p text:style-name="P685"><text:span text:style-name="T1374">37. 꺼지기 직전 타오르는 불꽃의 마지막 현상</text:span><text:span/></text:p>
      <text:p text:style-name="P686"><text:span text:style-name="T1375">🔑 핵심 키워드: 내적 현상, 촛불의 떨림, 에너지 수렴, 의식의 전환</text:span><text:span/></text:p>
      <text:p text:style-name="P687"><text:span text:style-name="T1376">🕯️ 앞선 다섯 가지 거친 원소들이 모두 내면으로 녹아내리면, 의식의 가장 깊은 곳에서 아주 독특한 내적 신호가 포착되기 시작해. 티베트 밀교에서는 이를 '타오르는 등잔불과 같은 현상'이라고 부르는데, 완전히 꺼지기 직전의 촛불이 마지막으로 한 번 크게 파르르 떨리며 불꽃을 피워 올리는 모습과 아주 똑같아. 수명을 다한 전등이 완전히 암전되기 바로 직전, 마지막으로 한 번 탁 하고 밝은 빛을 깜빡인 뒤 깊은 고요 속으로 들어가는 순간을 떠올려보면 쉽게 이</text:span><text:span text:style-name="T1377">해할 수 있을 거야.</text:span><text:span/></text:p>
      <text:p text:style-name="P688"><text:span text:style-name="T1378">🌀 이 눈부신 떨림은 결코 생명이 무의미하게 소멸하는 파괴의 과정이 아니라, 온몸에 흩어져 있던 의식의 파편들이 마침내 하나의 초점으로 완전히 모여들었다는 증거야. 사방에 갈라져 흐르던 물줄기들이 거대한 댐의 마지막 수문으로 한꺼번에 밀려들 때 거센 물보라와 소용돌이를 일으키는 것처럼, 거친 감각과 기운들이 중심 통로로 한데 뭉치면서 의식 속에서 일시적인 불꽃의 요동을 만들어내는 거지. 아주 정밀한 현미경으로 에너지의 마지막 집중을 들여다보는 듯한 역동적</text:span><text:span text:style-name="T1379">인 순간이야.</text:span><text:span/></text:p>
      <text:p text:style-name="P689"><text:span text:style-name="T1380">✨ 촛불이 꺼지기 직전의 그 짧은 깜빡임은 물질의 세계와 순수한 정신의 세계를 연결하는 가장 신비로운 경계선이기도 해. 컴퓨터 시스템을 완전히 종료하기 바로 직전, 모니터 화면이 마지막으로 한 번 번쩍이며 실행 중이던 모든 프로그램을 안전하게 닫는 것처럼, 우리 의식도 거친 육체적 대사를 모두 마감하며 내면의 가장 미세한 영역으로 넘어갈 준비를 마쳤음을 알리는 신호거든. 이 마지막 흔들림이야말로 곧 찾아올 위대한 명광의 침묵을 예고하는 서막인 셈이지.</text:span><text:span/></text:p>
      <text:p text:style-name="P690"><text:span text:style-name="T1381">🌊 일반적인 사람들은 이 불꽃의 떨림을 마주할 때 의식이 흐려지며 두려움을 느끼기도 하지만, 밀교 수행자들에게는 이 순간이 가장 투명한 본래의 마음을 깨울 수 있는 최고의 타이밍이 돼. 거친 폭풍우가 한바탕 몰아치고 지나간 뒤에야 비로소 잔잔하고 투명한 바다의 속살이 드러나는 것처럼, 불꽃이 마지막으로 타오르고 난 뒤 찾아올 깊은 고요 속에서 명광의 지혜를 온전히 마주할 수 있으니까. 이 흔들림 속에서 중심을 잡는 법을 배우는 것이 뇌의 영적 성장이자 깨</text:span><text:span text:style-name="T1382">달음으로 가는 열쇠야.</text:span><text:span/></text:p>
      <text:p text:style-name="P691"><text:span text:style-name="T1383">📝 핵심 요약</text:span><text:span/></text:p>
      <text:list text:style-name="WWNum47" text:continue-numbering="true">
        <text:list-item>
          <text:p text:style-name="P692"><text:span text:style-name="T1384">다섯 원소가 소멸할 때 의식 내부에서는 꺼지기 직전 촛불이 파르르 떠는 것 같은 결정적인 내적 현상이 나타난다.</text:span><text:span/></text:p>
        </text:list-item>
        <text:list-item>
          <text:p text:style-name="P693"><text:span text:style-name="T1385">이는 거친 에너지와 감각들이 의식의 중심 통로로 완전히 수렴하면서 발생하는 마지막 생명력의 불꽃이다.</text:span><text:span/></text:p>
        </text:list-item>
        <text:list-item>
          <text:p text:style-name="P694"><text:span text:style-name="T1386">물질의 세계를 마감하고 가장 미세한 순수 정신의 영역으로 진입함을 알리는 우주적인 경계선이다.</text:span><text:span/></text:p>
        </text:list-item>
        <text:list-item>
          <text:p text:style-name="P695"><text:span text:style-name="T1387">수행자는 이 마지막 떨림 이후에 찾아오는 거대한 침묵 속에서 근원의 명광을 명확히 알아차리는 훈련을 한다.</text:span><text:span/></text:p>
        </text:list-item>
      </text:list>
      <text:p text:style-name="P696"><text:span><text:soft-page-break/></text:span><text:span/></text:p>
      <text:p text:style-name="P697"><text:span text:style-name="T1388">[🟢 Online Mode | 26.06.01_12:45:44]</text:span><text:span/></text:p>
      <text:p text:style-name="P698"><text:span text:style-name="T1389">38. 원소의 은멸과 힘의 교대식</text:span><text:span/></text:p>
      <text:p text:style-name="P699"><text:span text:style-name="T1390">🔑 핵심 키워드: 사대 은멸, 감관 알음이, 힘의 거두어들임, 잠재력의 발현</text:span><text:span/></text:p>
      <text:p text:style-name="P700"><text:span text:style-name="T1391">🎭 무대 위 배우의 자연스러운 교대</text:span><text:span/></text:p>
      <text:p text:style-name="P701"><text:span text:style-name="T1392">땅, 물, 불, 바람이라는 네 가지 물질 원소가 차례로 사라지는 과정은 하나의 원소가 물리적으로 녹아서 다음 원소로 형태를 바꾸는 게 아니야. 앞선 원소가 의식을 지탱해주던 자신의 고유한 에너지를 서서히 거두어들이면서, 자연스럽게 뒤에서 대기하던 다음 원소의 존재감이 더 뚜렷하게 도드라지는 현상이지. 연극 무대에서 조명이 정면에 있던 주인공을 비추다 뒤쪽의 배우를 비추면 전면에 있던 배우가 어둠 속으로 물러나고 다음 배우에게 시선이 집중되는 것과 똑같은 </text:span><text:span text:style-name="T1393">이치라고 생각하면 돼.</text:span><text:span/></text:p>
      <text:p text:style-name="P702"><text:span text:style-name="T1394">📱 백그라운드 앱의 전환과 화면 표시</text:span><text:span/></text:p>
      <text:p text:style-name="P703"><text:span text:style-name="T1395">우리가 매일 쓰는 스마트폰으로 비유하자면, 화면에 크게 켜져 있던 무거운 앱을 완전히 종료했을 때 그 밑에 열려 있던 다음 앱이 전체 화면으로 매끄럽게 떠오르는 과정과 같아. 먼저 실행되던 앱이 다음 앱의 데이터로 변환된 게 아니라, 단지 제어권을 완전히 넘겨주고 뒤로 물러났을 뿐이잖아. 이처럼 우리 몸의 감각을 지탱하던 근본 원소들도 물질적인 결합이 화학적으로 바뀌는 게 아니라 의식을 받쳐주는 주도권의 순서가 바뀔 뿐이야.</text:span><text:span/></text:p>
      <text:p text:style-name="P704"><text:span text:style-name="T1396">🔌 감각을 지탱하는 플러그 뽑기</text:span><text:span/></text:p>
      <text:p text:style-name="P705"><text:span text:style-name="T1397">각각의 원소들은 우리가 외부 세계를 인지하는 감관 알음이를 단단하게 붙잡아주는 전원 공급 장치 역할을 담당하고 있어. 앞선 원소의 힘이 소멸한다는 건 그 감각 세계를 유지하던 전원 플러그가 조용히 뽑히는 것을 의미하지. 에너지를 공급하던 중심축이 힘을 잃고 뒤로 물러나면, 그동안 그 힘에 가려져서 보이지 않던 다음 단계의 미세한 원소적 성질들이 전면에 드러나며 의식의 스크린을 채우게 돼.</text:span><text:span/></text:p>
      <text:p text:style-name="P706"><text:span text:style-name="T1398">🌊 녹아드는 것이 아닌 흐름의 이어짐</text:span><text:span/></text:p>
      <text:p text:style-name="P707"><text:span text:style-name="T1399">따라서 흙이 물이 되고 물이 불로 완전히 화학적 변성을 일으킨다는 오해는 접어두는 게 좋아. 이것은 철저하게 에너지가 작용하는 무대의 바통 터치이자, 의식을 지탱하는 힘의 바다에서 일어나는 자연스러운 세대교체일 뿐이니까. 거친 차원의 물질적 지지대가 스스로 에너지를 거둠으로써 우리의 의식은 더 깊고 미세한 본연의 정신적 영역으로 안전하게 진입할 수 있는 통로를 얻게 되는 셈이야.</text:span><text:span/></text:p>
      <text:p text:style-name="P708"><text:span text:style-name="T1400">📝 핵심 요약</text:span><text:span/></text:p>
      <text:list text:style-name="WWNum48" text:continue-numbering="true">
        <text:list-item>
          <text:p text:style-name="P709"><text:span text:style-name="T1401">원소가 은멸하는 것은 앞의 원소가 뒤의 원소 속으로 물리적으로 녹아드는 현상이 아님.</text:span><text:span/></text:p>
        </text:list-item>
        <text:list-item>
          <text:p text:style-name="P710"><text:span text:style-name="T1402">앞선 원소가 감관 알음이를 지탱하던 자신의 에너지를 거두어들이는 과정임.</text:span><text:span/></text:p>
        </text:list-item>
        <text:list-item>
          <text:p text:style-name="P711"><text:span text:style-name="T1403">지탱하던 힘이 빠져나감에 따라 자연스럽게 다음 원소의 힘이 표면으로 명확히 드러남.</text:span><text:span/></text:p>
        </text:list-item>
        <text:list-item>
          <text:p text:style-name="P712"><text:span text:style-name="T1404">이는 물질의 화학적 변형이 아니라 의식을 지탱하는 에너지 주도권의 순차적인 교대식임.</text:span><text:span/></text:p>
        </text:list-item>
      </text:list>
      <text:p text:style-name="P713"><text:span><text:soft-page-break/></text:span><text:span/></text:p>
      <text:p text:style-name="P714"><text:span text:style-name="T1405">39. 원소 은멸의 진정한 의미와 에너지 바통 터치</text:span><text:span/></text:p>
      <text:p text:style-name="P715"><text:span text:style-name="T1406">🔑 핵심 키워드: 은멸, 땅의 원소, 물의 원소, 의식 지탱</text:span><text:span/></text:p>
      <text:p text:style-name="P716"><text:span text:style-name="T1407">🌍 밀교에서 </text:span><text:span text:style-name="T1408">땅의 원소가 물의 원소로 녹아든다</text:span><text:span text:style-name="T1409">고 말하는 건, 우리가 주변에서 흔히 보는 진짜 흙이 물에 풀려서 진흙탕이 되는 물리적인 현상이 아니야. 이건 우리 몸 안에서 의식을 떠받치고 있던 미세한 에너지의 주도권이 바뀐다는 아주 신비로운 뜻을 담고 있어. 시각을 담당하던 거친 에너지가 수명을 다하면서 다음 단계인 청각을 담당하는 에너지에게 자리를 넘겨주는 일종의 에너지 전환 과정이라고 보면 돼.</text:span><text:span/></text:p>
      <text:p text:style-name="P717"><text:span text:style-name="T1410">🏃 이걸 쉽게 이해하려면 이어달리기 시합에서 주자들이 바통을 터치하는 모습을 떠올리면 아주 좋아. 첫 번째 주자인 땅의 바람이 열심히 달리다가 자신의 임무를 마치고, 다음 주자인 물의 바람에게 의식을 유지하는 주도권이라는 바통을 안전하게 넘겨주는 거지. 첫 번째 주자가 눈앞에서 사라진 것처럼 보여도 그의 에너지는 고스란히 다음 주자에게 이어져서 전체 경기를 계속 진행하게 만드는 원리와 같아.</text:span><text:span/></text:p>
      <text:p text:style-name="P718"><text:span text:style-name="T1411">⚙️ 조금 더 미세하게 분석해 보면, 땅의 에너지가 눈의 알음이를 지탱하던 힘을 점차 잃어버릴 때 물의 에너지가 귀의 알음이를 지탱하는 힘을 더 뚜렷하게 드러내게 돼. 스마트폰을 쓰다가 배터리가 얼마 남지 않았을 때 화면 밝기를 완전히 낮추는 대신 소리를 들려주는 오디오 기능에 남은 전력을 몰아주는 시스템 제어 방식과 비슷해. 겉으로는 화면이 꺼져서 멈춘 것 같지만 내부에서는 오디오를 살리려고 에너지가 효율적으로 이동한 셈이지.</text:span><text:span/></text:p>
      <text:p text:style-name="P719"><text:span text:style-name="T1412">🌀 결국 은멸이라는 현상은 무언가가 완전히 파괴되어 사라지는 비극이 아니라, 의식을 더 깊고 순수한 중심으로 모으기 위한 아름다운 에너지 재배치 과정이야. 거친 감각의 에너지를 하나씩 접어두면서 가장 본질적인 불성을 드러내기 위한 정교한 흐름인 거지. 이 변화의 메커니즘을 정확하게 이해하면 죽음의 순간을 당황하지 않고 깨달음의 기회로 바꿀 수 있는 단단한 내면의 힘이 자라나게 돼.</text:span><text:span/></text:p>
      <text:p text:style-name="P720"><text:span text:style-name="T1413">📝 핵심 요약</text:span><text:span/></text:p>
      <text:list text:style-name="WWNum49" text:continue-numbering="true">
        <text:list-item>
          <text:p text:style-name="P721"><text:span text:style-name="T1414">땅이 물로 은멸하는 것은 물리적인 결합이 아니라 미세한 에너지의 주도권 전환임</text:span><text:span/></text:p>
        </text:list-item>
        <text:list-item>
          <text:p text:style-name="P722"><text:span text:style-name="T1415">시각을 지탱하던 땅의 바람이 힘을 잃으면 청각을 지탱하는 물의 바람이 뚜렷해짐</text:span><text:span/></text:p>
        </text:list-item>
        <text:list-item>
          <text:p text:style-name="P723"><text:span text:style-name="T1416">이는 의식을 소멸시키는 것이 아니라 더 깊은 중심으로 모으기 위한 재배치 과정임</text:span><text:span/></text:p>
        </text:list-item>
        <text:list-item>
          <text:p text:style-name="P724"><text:span text:style-name="T1417">에너지의 이동 원리를 이해하는 것이 죽음의 순간에 깨달음을 얻는 핵심 열쇠가 됨</text:span><text:span/></text:p>
        </text:list-item>
      </text:list>
      <text:p text:style-name="P725"><text:span><text:soft-page-break/></text:span><text:span/></text:p>
      <text:p text:style-name="P726"><text:span text:style-name="T1418">40. 모든 원소에 동일하게 적용되는 보편적 소멸의 법칙</text:span><text:span/></text:p>
      <text:p text:style-name="P727"><text:span text:style-name="T1419">🔑 핵심 키워드: 원소의 소멸, 보편적 공식, 은멸 과정, 에너지 전환, 일관된 흐름</text:span><text:span/></text:p>
      <text:p text:style-name="P728"><text:span text:style-name="T1420">🧩 모두에게 동일하게 적용되는 자연의 공식</text:span><text:span/></text:p>
      <text:p text:style-name="P729"><text:span text:style-name="T1421">앞서 본 신비로운 불꽃 현상처럼, 몸을 구성하는 다른 모든 원소들이 사라질 때도 정확히 같은 법칙이 적용돼. 이것은 마치 전 세계 어디서나 똑같이 적용되는 수학 공식이나 중력의 법칙과 같단다. 어떤 원소가 먼저 소멸하든 간에, 그 에너지가 거친 상태에서 미세한 상태로 가라앉는 근본적인 원리와 순서는 결코 변하지 않아. 이 보편적인 흐름을 이해하면 죽음이라는 거대한 변화가 결코 무질서한 혼란이 아니라, 아주 정교하게 짜인 대자연의 질서라는 것을 깨닫게 되지</text:span><text:span text:style-name="T1422">. 어려운 개념처럼 보이지만 차근차근 따라오면 우리 뇌가 한 단계 더 깊고 넓게 성장할 수 있어.</text:span><text:span/></text:p>
      <text:p text:style-name="P730"><text:span text:style-name="T1423">🎯 차례대로 쓰러지는 도미노의 원리</text:span><text:span/></text:p>
      <text:p text:style-name="P731"><text:span text:style-name="T1424">여타의 원소들이 차례로 소멸하는 과정은 정교하게 세워둔 도미노 블록이 하나씩 쓰러지는 모습과 아주 비슷해. 첫 번째 블록이 쓰러지면 그 힘이 다음 블록으로 고스란히 전달되어 결국 마지막 블록까지 차례대로 넘어지는 것처럼 말이지. 우리 몸의 땅, 물, 불, 바람 같은 원소들도 하나가 힘을 잃으면 그 기운이 다음 단계의 미세한 원소로 자연스럽게 흡수되면서 이어져. 이러한 연쇄 반응을 통해 거친 물질적 에너지는 완벽하게 정화되어 가장 순수한 정신적 에너지로 탈</text:span><text:span text:style-name="T1425">바꿈하게 되는 거란다.</text:span><text:span/></text:p>
      <text:p text:style-name="P732"><text:span text:style-name="T1426">🚦 내면이 보내는 일관된 신호등</text:span><text:span/></text:p>
      <text:p text:style-name="P733"><text:span text:style-name="T1427">다른 원소들이 소멸할 때도 각각 그에 걸맞은 독특한 내적 신호들이 의식 속에 나타나게 되어 있어. 우리가 도로를 운전할 때 신호등의 불빛이 초록색에서 노란색, 그리고 빨간색으로 일관되게 바뀌는 것처럼 우리 몸도 정해진 신호를 보내는 거지. 앞서 보았던 반딧불이나 연기 속의 불티 같은 환영들처럼, 다른 원소들의 은멸 과정에서도 마음의 눈에만 보이는 특별한 풍경들이 순서대로 펼쳐져. 이 신호들은 의식이 거친 육체의 속박에서 벗어나 아주 깊은 내면의 세계로 무</text:span><text:span text:style-name="T1428">사히 진입하고 있음을 알려주는 안전한 이정표 역할을 해 준단다.</text:span><text:span/></text:p>
      <text:p text:style-name="P734"><text:span text:style-name="T1429">🌊 거대한 바다로 합쳐지는 에너지의 통합</text:span><text:span/></text:p>
      <text:p text:style-name="P735"><text:span text:style-name="T1430">결국 모든 원소가 그와 같은 방식으로 소멸한다는 것은, 우리 몸의 모든 에너지가 하나의 거대한 근원으로 돌아간다는 뜻이야. 여러 갈래로 갈라져 흐르던 수많은 시냇물들이 결국에는 하나의 거대한 바다로 모여들어 완벽하게 하나가 되는 것처럼 말이지. 이 보편적인 소멸의 과정을 거치면서 우리 마음은 모든 분별과 차별이 사라진 가장 순수하고 고요한 상태, 즉 무상유가딴뜨라가 지향하는 본질적인 깨달음의 자리에 도달할 완벽한 준비를 마치게 돼.</text:span><text:span/></text:p>
      <text:p text:style-name="P736"><text:span text:style-name="T1431">📝 핵심 요약</text:span><text:span/></text:p>
      <text:list text:style-name="WWNum50" text:continue-numbering="true">
        <text:list-item>
          <text:p text:style-name="P737"><text:span text:style-name="T1432">다른 모든 원소들의 소멸 과정에도 앞서 설명한 것과 정확히 동일한 보편적 법칙이 적용된다.</text:span><text:span/></text:p>
        </text:list-item>
        <text:list-item>
          <text:p text:style-name="P738"><text:span text:style-name="T1433">원소의 은멸은 정교한 도미노처럼 거친 에너지에서 미세한 에너지로 차례차례 전환되는 과정이다.</text:span><text:span/></text:p>
        </text:list-item>
        <text:list-item>
          <text:p text:style-name="P739"><text:span text:style-name="T1434">각 원소가 사라질 때마다 내면에는 일관된 신호등처럼 마음의 눈에만 보이는 특별한 환영이 나타난다.</text:span><text:span/></text:p>
        </text:list-item>
        <text:list-item>
          <text:p text:style-name="P740"><text:span text:style-name="T1435">이 모든 보편적 소멸 과정을 통해 분산되어 있던 에너지는 하나의 거대한 근원으로 통합된다.</text:span><text:span/></text:p>
        </text:list-item>
      </text:list>
      <text:p text:style-name="P741"><text:span><text:soft-page-break/></text:span><text:span/></text:p>
      <text:p text:style-name="P742"><text:span text:style-name="T1436">[🟢 Online Mode | 26.06.01_12:53:26]</text:span><text:span/></text:p>
      <text:p text:style-name="P743"><text:span text:style-name="T1437">41. 거친 물질의 소멸 뒤에 찾아오는 다섯 가지 의식의 파도</text:span><text:span/></text:p>
      <text:p text:style-name="P744"><text:span text:style-name="T1438">🔑 핵심 키워드: 80자성의 분별심, 현명과 증휘, 근득, 죽음의 정광명</text:span><text:span/></text:p>
      <text:p text:style-name="P745"><text:span text:style-name="T1439">🧠 80자성 분별심의 정지와 일상적 마음의 해체</text:span><text:span/></text:p>
      <text:p text:style-name="P746"><text:span text:style-name="T1440">지대, 수대, 화대, 풍대라는 거친 네 가지 물질적 원소가 모두 소멸하고 나면, 우리 의식의 가장 깊은 영역인 식온의 다섯 가지 마음이 차례대로 깨어나기 시작해. 그 첫 번째 관문이 바로 범속한 생각들로 가득 차 있던 80자성의 분별의 마음이 멈추는 단계야. 이것은 마치 하루 종일 정신없이 켜져 있던 컴퓨터의 수백 개 백그라운드 프로그램들이 터치 한 번에 일제히 종료되며 메인 화면만 남는 과정과 아주 비슷해.</text:span><text:span/></text:p>
      <text:p text:style-name="P747"><text:span text:style-name="T1441">🕯️ 성냄과 탐욕이 정화되는 현명과 증휘의 빛</text:span><text:span/></text:p>
      <text:p text:style-name="P748"><text:span text:style-name="T1442">이어서 감정의 뿌리가 미세한 빛으로 변형되어 나타나는 현명과 증휘의 단계가 펼쳐져. 현명은 성냄의 에너지가 정화되면서 밤하늘에 은은한 달빛이 가득 차오르는 듯한 33자성의 밝은 마음을 보여주고, 증휘는 탐욕의 에너지가 거치며 온 세상에 노을이 붉게 물드는 듯한 40자성의 한층 밝은 마음으로 이어지지. 거친 감정들이 다 타버린 자리에 오직 순수한 빛의 풍경만 남는 영적인 시각화의 순간이야.</text:span><text:span/></text:p>
      <text:p text:style-name="P749"><text:span text:style-name="T1443">🌌 암흑의 근득을 지나 마주하는 죽음의 정광명</text:span><text:span/></text:p>
      <text:p text:style-name="P750"><text:span text:style-name="T1444">다음으로 무지의 에너지가 녹아내리며 아무것도 보이지 않는 칠흑 같은 어둠의 상태인 근득이 찾아와. 그리고 이 완벽한 어둠의 터널을 통과하는 순간, 마침내 우주의 원초적 빛이자 깨달음의 정점인 죽음의 정광명이 눈부시게 피어나게 되지. 해가 뜨기 직전이 가장 어둡고 차가운 새벽녘인 것처럼, 근득의 깊은 암흑을 거쳐야만 비로소 본연의 가장 순수하고 투명한 태양빛을 마주할 수 있게 되는 거야.</text:span><text:span/></text:p>
      <text:p text:style-name="P751"><text:span text:style-name="T1445">🧭 양파 알맹이만 남은 식온의 위대한 여정</text:span><text:span/></text:p>
      <text:p text:style-name="P752"><text:span text:style-name="T1446">이 다섯 가지 마음의 순차적인 흐름은 결국 겉을 둘러싸고 있던 거친 물질과 감정의 양파 껍질들을 전부 벗겨내고 마침내 마음의 가장 핵심적인 알맹이만 남기는 과정이야. 이렇게 식온의 다섯 부류가 차례로 드러나는 메커니즘을 온전히 이해하고 머무를 수 있다면, 죽음은 공포가 아니라 가장 순수한 본래의 나를 만나는 위대한 영적 도약의 기회가 될 수 있어.</text:span><text:span/></text:p>
      <text:p text:style-name="P753"><text:span text:style-name="T1447">📝 핵심 요약</text:span><text:span/></text:p>
      <text:list text:style-name="WWNum51" text:continue-numbering="true">
        <text:list-item>
          <text:p text:style-name="P754"><text:span text:style-name="T1448">물질 원소가 소멸한 뒤 식온에 속하는 다섯 가지 마음의 단계가 차례대로 나타나.</text:span><text:span/></text:p>
        </text:list-item>
        <text:list-item>
          <text:p text:style-name="P755"><text:span text:style-name="T1449">일상적인 80자성의 분별심이 멈추며 컴퓨터 프로그램이 종료되듯 마음이 비워져.</text:span><text:span/></text:p>
        </text:list-item>
        <text:list-item>
          <text:p text:style-name="P756"><text:span text:style-name="T1450">성냄과 탐욕이 정화되면서 달빛 같은 현명과 노을빛 같은 증휘의 마음이 발현돼.</text:span><text:span/></text:p>
        </text:list-item>
        <text:list-item>
          <text:p text:style-name="P757"><text:span text:style-name="T1451">무지의 암흑인 근득을 통과하면 마침내 원초의 빛인 죽음의 정광명을 마주하게 돼.</text:span><text:span/></text:p>
        </text:list-item>
      </text:list>
      <text:p text:style-name="P758"><text:span><text:soft-page-break/></text:span><text:span/></text:p>
      <text:p text:style-name="P759"><text:span text:style-name="T1452">42. 거친 분별심의 소멸과 하얀 광명의 서막</text:span><text:span/></text:p>
      <text:p text:style-name="P760"><text:span text:style-name="T1453">🔑 핵심 키워드: 80자성, 거친 분별심, 생명의 바람, 하얀 광명, 현명</text:span><text:span/></text:p>
      <text:p text:style-name="P761"><text:span text:style-name="T1454">🌪️ 낮의 소음이 물러가는 의식의 교차로</text:span><text:span/></text:p>
      <text:p text:style-name="P762"><text:span text:style-name="T1455">죽음의 여정이 더 깊어지면 일상적으로 우리 머릿속을 복잡하게 채우던 80가지의 거친 분별심이 일시에 활동을 멈추게 돼. 이것은 마치 수많은 차들이 뒤엉켜 경적을 울리던 대도시의 번화가가 심야 시간이 되면서 한순간에 고요해지는 것과 같아. 우리가 깨어 있을 때 끊임없이 이어지던 좋고 싫음, 맞고 틀림을 따지던 거친 생각의 파도들이 더 미세한 마음의 세계를 열어주기 위해 완전히 소멸하는 단계지.</text:span><text:span/></text:p>
      <text:p text:style-name="P763"><text:span text:style-name="T1456">🏇 달리던 말과 기수가 함께 멈추는 순간</text:span><text:span/></text:p>
      <text:p text:style-name="P764"><text:span text:style-name="T1457">이 거친 분별심들은 혼자 움직이는 게 아니라 생명의 바람이라는 에너지의 양식에 올라타서 움직여. 마음을 기수라고 한다면 생명의 바람은 그 기수를 태우고 달리는 역동적인 말과 같지. 거친 마음이 소멸할 때는 이 두 가지가 동시에 힘을 잃고 사라지게 돼. 기수가 말에서 내려오고 말도 달리기를 멈추는 것처럼, 마음과 에너지가 함께 고요해지면서 의식의 표면적인 움직임이 완전히 정지하는 거야.</text:span><text:span/></text:p>
      <text:p text:style-name="P765"><text:span text:style-name="T1458">☀️ 태양이 떠오르면 사라지는 별빛의 이치</text:span><text:span/></text:p>
      <text:p text:style-name="P766"><text:span text:style-name="T1459">왜 거친 분별심과 생명의 바람이 먼저 사라져야 할까? 바로 다음에 찾아올 하얀 광명의 상태와는 거칠고 미세한 수준의 차이가 너무나 크기 때문이야. 이것은 한낮에 눈부신 태양이 떠오르면 밤하늘을 수놓았던 희미한 별빛들이 흔적도 없이 사라지는 이치와 똑같아. 인식하는 경계와 성격이 완전히 다르기 때문에, 아주 미세하고 순수한 하얀 광명의 세계에서는 거칠고 투박한 분별의 의식이 함께 존재할 수 없는 법이지.</text:span><text:span/></text:p>
      <text:p text:style-name="P767"><text:span text:style-name="T1460">🤍 미세한 의식의 바다로 들어가는 준비</text:span><text:span/></text:p>
      <text:p text:style-name="P768"><text:span text:style-name="T1461">거친 마음의 해체는 결국 우리가 지닌 가장 순수하고 밝은 내면의 빛인 현명을 맞이하기 위한 필수적인 청소 과정이야. 복잡한 낙서로 가득 차 있던 칠판을 깨끗하게 지워내야만 새로운 그림을 그릴 수 있는 맑고 하얀 칠판이 드러나는 것처럼 말이지. 모든 거친 생각의 짐을 벗어던진 의식은 이제 하얗게 빛나는 거대한 광명의 바다를 향해 더 깊숙이 빠져들 준비를 마치게 돼.</text:span><text:span/></text:p>
      <text:p text:style-name="P769"><text:span text:style-name="T1462">📝 핵심 요약</text:span><text:span/></text:p>
      <text:list text:style-name="WWNum52" text:continue-numbering="true">
        <text:list-item>
          <text:p text:style-name="P770"><text:span text:style-name="T1463">인간의 의식을 구성하던 80가지의 거친 분별심과 이를 움직이던 생명의 바람이 소멸한다.</text:span><text:span/></text:p>
        </text:list-item>
        <text:list-item>
          <text:p text:style-name="P771"><text:span text:style-name="T1464">거친 의식과 에너지의 소멸은 다음에 나타날 하얀 광명보다 한 단계 앞서서 일어난다.</text:span><text:span/></text:p>
        </text:list-item>
        <text:list-item>
          <text:p text:style-name="P772"><text:span text:style-name="T1465">거친 마음과 미세한 광명은 수준 차이가 너무 커서 하나의 의식 상태에 공존할 수 없다.</text:span><text:span/></text:p>
        </text:list-item>
        <text:list-item>
          <text:p text:style-name="P773"><text:span text:style-name="T1466">거친 분별심이 사라짐으로써 가장 미세하고 순수한 내면의 빛인 현명이 드러날 준비를 마친다.</text:span><text:span/></text:p>
        </text:list-item>
      </text:list>
      <text:p text:style-name="P774"><text:span><text:soft-page-break/></text:span><text:span/></text:p>
      <text:p text:style-name="P775"><text:span text:style-name="T1467">[🔴 Offline Mode | 26.06.01_12:53:37]</text:span><text:span/></text:p>
      <text:p text:style-name="P776"><text:span text:style-name="T1468">43. 분별의 마음이 녹아내릴 때 피어나는 의식의 촛불</text:span><text:span/></text:p>
      <text:p text:style-name="P777"><text:span text:style-name="T1469">🔑 핵심 키워드: 80자성 분별심, 생명의 바람, 33자성 명경심, 촛불의 현상</text:span><text:span/></text:p>
      <text:p text:style-name="P778"><text:span text:style-name="T1470">🧠 분별의 마음과 생명 에너지의 은멸</text:span><text:span/></text:p>
      <text:p text:style-name="P779"><text:span text:style-name="T1471">인간이 지닌 여든 가지의 세세한 분별심, 즉 세상을 이리저리 나누고 판단하는 복잡한 생각들이 마침내 그 생각을 태우고 달리던 운반체인 생명의 바람과 합쳐져 깊은 은멸의 단계로 들어가게 돼. 이것은 마치 하루 종일 복잡한 도심을 바쁘게 달리던 수많은 자동차들이 연료를 모두 소진하고 마침내 조용한 차고지로 하나둘씩 돌아와 시동을 끄는 과정과 아주 비슷해. 거칠고 분주했던 표면의 의식들이 힘을 잃고, 더 깊고 본질적인 마음의 차원으로 흡수되는 거대한 전환점이지</text:span><text:span text:style-name="T1472">.</text:span><text:span/></text:p>
      <text:p text:style-name="P780"><text:span text:style-name="T1473">🌪️ 생각의 마차를 움직이던 바람의 수축</text:span><text:span/></text:p>
      <text:p text:style-name="P781"><text:span text:style-name="T1474">여기서 생명의 바람은 우리의 수많은 생각 조각들을 온몸으로 나르고 유지해 주던 보이지 않는 마차와 같아. 평소에는 이 바람의 에너지가 끊임없이 출렁이기 때문에 우리의 마음도 쉼 없이 흔들리고 수많은 망상을 피워내게 되는 거거든. 하지만 소멸의 순간에 이르러 이 마차와 운전수가 서로 역할을 다하고 하나의 초점으로 녹아내리면서, 외부를 향해 거칠게 소용돌이치던 마음의 파도들이 완벽하게 잔잔해지는 기적 같은 고요함이 찾아오게 된단다.</text:span><text:span/></text:p>
      <text:p text:style-name="P782"><text:span text:style-name="T1475">💡 서른세 가지 자성의 밝은 마음으로의 융합</text:span><text:span/></text:p>
      <text:p text:style-name="P783"><text:span text:style-name="T1476">이렇게 분주했던 여든 가지 분별심이 에너지를 거두어들이면, 의식은 한층 더 투명하고 순수한 영역인 서른세 가지 자성의 밝은 마음 속으로 온전히 녹아들게 돼. 온갖 색깔의 물감들이 커다란 그릇에 담겨 한데 섞이다가 마침내 하나의 아주 맑고 하얀 빛으로 수렴되는 현상과도 같지. 겉모습에 집착하던 거친 생각들이 사라진 자리에, 존재 본연의 순수한 영성이 지닌 은은한 밝음이 마침내 제 모습을 드러내며 의식의 전면을 채우기 시작하는 거야.</text:span><text:span/></text:p>
      <text:p text:style-name="P784"><text:span text:style-name="T1477">🕯️ 의식의 한가운데서 타오르는 하나의 촛불</text:span><text:span/></text:p>
      <text:p text:style-name="P785"><text:span text:style-name="T1478">바로 이 의식의 융합이 일어나는 순간, 내면 의식 속에는 마치 어두운 방 한가운데에 고요히 켜진 촛불이 타오르는 것과 같은 신비로운 현상이 나타나게 돼. 사방의 모든 소음과 바람이 완벽하게 차단된 밀실에서 오직 하나의 불꽃만이 미동도 없이 똑바로 위를 향해 타오르는 듯한 절대적인 집중과 명징함의 상태를 경험하는 거지. 이 타오르는 촛불은 물질의 거친 외피를 모두 벗어던진 영혼이 마주하는, 본질적인 의식의 순수한 첫 새벽빛이라고 할 수 있어.</text:span><text:span/></text:p>
      <text:p text:style-name="P786"><text:span text:style-name="T1479">📝 핵심 요약</text:span><text:span/></text:p>
      <text:list text:style-name="WWNum53" text:continue-numbering="true">
        <text:list-item>
          <text:p text:style-name="P787"><text:span text:style-name="T1480">여든 가지의 복잡한 분별의 마음이 이를 운반하던 생명의 바람과 함께 은멸을 시작함.</text:span><text:span/></text:p>
        </text:list-item>
        <text:list-item>
          <text:p text:style-name="P788"><text:span text:style-name="T1481">외부로 향하던 거친 의식의 움직임이 차고지로 돌아오는 자동차들처럼 내면으로 수축함.</text:span><text:span/></text:p>
        </text:list-item>
        <text:list-item>
          <text:p text:style-name="P789"><text:span text:style-name="T1482">분주했던 생각들이 서른세 가지 자성을 지닌 맑고 밝은 마음의 영역으로 온전히 융합됨.</text:span><text:span/></text:p>
        </text:list-item>
        <text:list-item>
          <text:p text:style-name="P790"><text:span text:style-name="T1483">모든 분별이 사라진 의식의 한가운데에서 바람 없는 방의 촛불이 타오르는 듯한 현상이 일어남.</text:span><text:span/></text:p>
        </text:list-item>
      </text:list>
      <text:p text:style-name="P791"><text:span><text:soft-page-break/></text:span><text:span/></text:p>
      <text:p text:style-name="P792"><text:span text:style-name="T1484">44. 분별심의 은멸과 가을 달빛의 백색 광명</text:span><text:span/></text:p>
      <text:p text:style-name="P793"><text:span text:style-name="T1485">🔑 핵심 키워드: 자성분별 은멸, 밝은 마음, 가을 밤하늘, 하얀 광명</text:span><text:span/></text:p>
      <text:p text:style-name="P794"><text:span text:style-name="T1486">🌕 거친 분별심의 청정한 가라앉음</text:span><text:span/></text:p>
      <text:p text:style-name="P795"><text:span text:style-name="T1487">우리 마음을 복잡하게 만들던 여든 가지의 거친 분별심이 일시에 사라지고, 현명이라고 부르는 맑고 밝은 마음이 깨어나는 단계야. 평소에 우리가 채널을 끊임없이 돌리며 보던 복잡한 화면이 꺼지고, 하나의 순수한 빛만 남는 것과 비슷하지. 끊임없이 요동치던 일상의 감정과 생각들이 사르르 녹아내리며 의식이 한 단계 더 깊고 미세한 차원으로 들어서는 첫 번째 관문이야.</text:span><text:span/></text:p>
      <text:p text:style-name="P796"><text:span text:style-name="T1488">🌌 구름 없는 가을 밤하늘의 투명함</text:span><text:span/></text:p>
      <text:p text:style-name="P797"><text:span text:style-name="T1489">이때 의식 속에는 청명한 가을날에 달빛이 가득 차 있는 밤하늘 같은 풍경이 펼쳐져. 먼지나 구름이 단 하나도 없이 투명하게 탁 트인 밤하늘을 상상해봐. 사방이 텅 비어 있는 고요함 속에서 오직 은은한 달빛만이 누리를 가득 채우고 있는 상태지. 이것은 외부의 풍경을 보는 것이 아니라, 우리 마음의 본질이 얼마나 투명하고 깨끗한지 내면의 눈으로 직접 목격하는 순간이야.</text:span><text:span/></text:p>
      <text:p text:style-name="P798"><text:span text:style-name="T1490">🏳️ 의식의 심연에 뜨는 하얀 광명</text:span><text:span/></text:p>
      <text:p text:style-name="P799"><text:span text:style-name="T1491">텅 빈 고요함 속에서 온 의식을 부드럽게 감싸는 하얀 광명이 전면적으로 피어나게 돼. 어두운 방 안에 은은한 백색 조명을 켰을 때 주위가 포근하고 투명하게 밝아지는 느낌과 같아. 일상의 시끄러운 생각들이 완전히 가라앉았기 때문에, 마음 고유의 순수한 하얀 빛이 비로소 아무런 방해 없이 제 모습을 온전히 드러내는 현상이지.</text:span><text:span/></text:p>
      <text:p text:style-name="P800"><text:span text:style-name="T1492">⏳ 미세한 마음으로의 거대한 전환</text:span><text:span/></text:p>
      <text:p text:style-name="P801"><text:span text:style-name="T1493">이 상태는 거친 감각의 세계에서 미세한 영적 에너지의 세계로 완전히 주파수를 바꾸는 거대한 전환점이야. 시끄러운 시장통에서 벗어나 깊은 동굴 속의 고요함 속으로 완전히 몰입하는 과정과 같지. 우리 의식이 육체의 구속을 넘어 본연의 청정함을 회복하는 아주 아름답고 자연스러운 이동 단계라고 이해하면 돼.</text:span><text:span/></text:p>
      <text:p text:style-name="P802"><text:span text:style-name="T1494">📝 핵심 요약</text:span><text:span/></text:p>
      <text:list text:style-name="WWNum54" text:continue-numbering="true">
        <text:list-item>
          <text:p text:style-name="P803"><text:span text:style-name="T1495">일상을 지배하던 복잡한 여든 가지 분별심이 사라지고 밝은 마음인 현명이 깨어남</text:span><text:span/></text:p>
        </text:list-item>
        <text:list-item>
          <text:p text:style-name="P804"><text:span text:style-name="T1496">구름 한 점 없는 청명한 가을철 달빛이 가득한 밤하늘처럼 투명하고 텅 빈 고요함을 경험함</text:span><text:span/></text:p>
        </text:list-item>
        <text:list-item>
          <text:p text:style-name="P805"><text:span text:style-name="T1497">마음의 깊은 심연에서 세상을 부드럽게 감싸는 순수한 하얀 광명이 의식 전면에 나타남</text:span><text:span/></text:p>
        </text:list-item>
        <text:list-item>
          <text:p text:style-name="P806"><text:span text:style-name="T1498">거친 현실의 지각을 마감하고 아주 미세하고 청정한 의식 차원으로 완전히 주파수를 전환함</text:span><text:span/></text:p>
        </text:list-item>
      </text:list>
      <text:p text:style-name="P807"><text:span><text:soft-page-break/></text:span><text:span/></text:p>
      <text:p text:style-name="P808"><text:span text:style-name="T1499">[🟢 Online Mode | 26.06.01_12:53:50]</text:span><text:span/></text:p>
      <text:p text:style-name="P809"><text:span text:style-name="T1500">45. 백정의 하강과 내면의 달빛</text:span><text:span/></text:p>
      <text:p text:style-name="P810"><text:span text:style-name="T1501">🔑 핵심 키워드: 생명의 바람, 중맥 입입, 백정 하강, 내면의 달빛, 현명과 공</text:span><text:span/></text:p>
      <text:p text:style-name="P811"><text:span text:style-name="T1502">🌪️ 중심 통로로 모여드는 에너지의 소용돌이</text:span><text:span/></text:p>
      <text:p text:style-name="P812"><text:span text:style-name="T1503">좌우로 흩어져 흐르던 생명의 에너지(바람)들이 정수리를 향해 하나의 중심 통로(중맥)로 일제히 모여드는 단계야. 비유하자면 사방에서 흘러들던 작은 시냇물들이 하나의 거대한 인공 수로로 합쳐지며 강력한 수압을 만들어내는 것과 같지. 이 강력한 힘이 집중되면서 평소에 정수리를 단단히 묶고 있던 에너지의 매듭이 마침내 부드럽게 풀리게 돼.</text:span><text:span/></text:p>
      <text:p text:style-name="P813"><text:span text:style-name="T1504">💧 중력을 따라 흘러내리는 순백의 물방울</text:span><text:span/></text:p>
      <table:table table:style-name="ta6">
        <table:table-columns>
          <table:table-column table:style-name="co15"/>
          <table:table-column table:style-name="co16"/>
        </table:table-columns>
        <table:table-row table:style-name="ro17" table:default-cell-style-name="ce50">
          <table:table-cell table:style-name="ce51">
            <text:p text:style-name="P814"><text:span text:style-name="T1505">구분</text:span><text:span/></text:p>
          </table:table-cell>
          <table:table-cell table:style-name="ce52">
            <text:p text:style-name="P815"><text:span text:style-name="T1506">에너지의 이동 상태와 특성</text:span><text:span/></text:p>
          </table:table-cell>
        </table:table-row>
        <table:table-row table:style-name="ro18" table:default-cell-style-name="ce50">
          <table:table-cell table:style-name="ce53">
            <text:p text:style-name="P816"><text:span text:style-name="T1507">에너지의 본질</text:span><text:span/></text:p>
          </table:table-cell>
          <table:table-cell table:style-name="ce54">
            <text:p text:style-name="P817"><text:span text:style-name="T1508">아버지에게서 받은 생명의 정수인 하얀 보리심(백정)</text:span><text:span/></text:p>
          </table:table-cell>
        </table:table-row>
        <table:table-row table:style-name="ro19" table:default-cell-style-name="ce50">
          <table:table-cell table:style-name="ce55">
            <text:p text:style-name="P818"><text:span text:style-name="T1509">형태와 성질</text:span><text:span/></text:p>
          </table:table-cell>
          <table:table-cell table:style-name="ce56">
            <text:p text:style-name="P819"><text:span text:style-name="T1510">범어 '함(Ham)' 자가 뒤집힌 모양이며, 본질적으로 물의 성질을 띰</text:span><text:span/></text:p>
          </table:table-cell>
        </table:table-row>
        <table:table-row table:style-name="ro20" table:default-cell-style-name="ce50">
          <table:table-cell table:style-name="ce57">
            <text:p text:style-name="P820"><text:span text:style-name="T1511">이동 양상</text:span><text:span/></text:p>
          </table:table-cell>
          <table:table-cell table:style-name="ce58">
            <text:p text:style-name="P821"><text:span text:style-name="T1512">정수리 매듭이 풀림과 동시에 척추 중심 통로를 타고 아래로 미끄러져 내림</text:span><text:span/></text:p>
          </table:table-cell>
        </table:table-row>
      </table:table>
      <text:p text:style-name="P822"><text:span text:style-name="T1513">마치 지붕 끝에 맺혀 있던 투명한 얼음이 따뜻한 햇볕에 녹아내려 중심 기둥을 타고 부드럽게 한 방울씩 흘러내리는 과정과 아주 흡사해.</text:span><text:span/></text:p>
      <text:p text:style-name="P823"><text:span text:style-name="T1514">🤍 가뭄 끝에 가슴속을 채우는 태초의 달빛</text:span><text:span/></text:p>
      <text:list text:style-name="WWNum55" text:continue-numbering="true">
        <text:list-item>
          <text:p text:style-name="P824"><text:span text:style-name="T1515">이동의 종착지: 하강하던 백색의 방울이 심장을 감싸고 있는 여섯 겹의 매듭 상단에 멈추어 서게 돼.</text:span><text:span/></text:p>
        </text:list-item>
        <text:list-item>
          <text:p text:style-name="P825"><text:span text:style-name="T1516">시각적 경험: 이 순간 존재의 내면에는 온 세상을 하얗게 비추는 눈부신 달빛 같은 광명이 가득 피어나지.</text:span><text:span/></text:p>
        </text:list-item>
        <text:list-item>
          <text:p text:style-name="P826"><text:span text:style-name="T1517">주의할 점: 이것은 밤하늘에 뜬 실제 달을 눈으로 보는 게 아니라, 외부의 빛이 완전히 차단된 상태에서 영혼의 에너지가 결합하며 스스로 발산하는 정신적인 빛이야.</text:span><text:span/></text:p>
        </text:list-item>
      </text:list>
      <text:p text:style-name="P827"><text:span text:style-name="T1518">🌌 모든 분별이 사라진 밝고 텅 빈 공간</text:span><text:span/></text:p>
      <text:p text:style-name="P828"><text:span text:style-name="T1519">이 신비로운 정신적 단계를 '밝은 마음(현명)'이자 '텅 빈 상태(공)'라고 부르게 돼. 우리가 일상에서 끊임없이 하던 수많은 복잡한 잡념과 고정관념이라는 무거운 짐들이 인지 체계에서 한순간에 증발해 버리기 때문에 비어 있다고 표현하는 거지. 거친 생각의 바람들이 모두 멈춰 서고, 오직 투명한 의식의 빛깔만 밤하늘의 은은한 달빛처럼 빛나는 절대적인 평온의 상태야.</text:span><text:span/></text:p>
      <text:p text:style-name="P829"><text:span text:style-name="T1520">📝 핵심 요약</text:span><text:span/></text:p>
      <text:list text:style-name="WWNum55" text:continue-numbering="true">
        <text:list-item>
          <text:p text:style-name="P830"><text:span text:style-name="T1521">좌우 맥도의 생명 에너지가 중심 통로로 모여 정수리의 차크라 매듭을 풀어냄.</text:span><text:span/></text:p>
        </text:list-item>
        <text:list-item>
          <text:p text:style-name="P831"><text:span text:style-name="T1522">물의 성질을 가진 하얀 보리심이 통로를 따라 심장 매듭이 있는 곳까지 하강함.</text:span><text:span/></text:p>
        </text:list-item>
        <text:list-item>
          <text:p text:style-name="P832"><text:span text:style-name="T1523">백색 방울이 심장에 도달하면서 외부의 빛이 아닌 내면 고유의 은은한 달빛 환영이 일어남.</text:span><text:span/></text:p>
        </text:list-item>
        <text:list-item>
          <text:p text:style-name="P833"><text:span text:style-name="T1524">세속의 수많은 잡념과 분별 의식이 완전히 사라진 맑고 투명한 현명과 공의 상태를 이룸.</text:span><text:span/></text:p>
        </text:list-item>
      </text:list>
      <text:p text:style-name="P834"><text:span><text:soft-page-break/></text:span><text:span/></text:p>
      <text:p text:style-name="P835"><text:span text:style-name="T1525">[🟢 Online Mode | 26.06.01_12:53:58]</text:span><text:span/></text:p>
      <text:p text:style-name="P836"><text:span text:style-name="T1526">46. 밝은 마음의 융합과 오렌지빛 하늘의 서막</text:span><text:span/></text:p>
      <text:p text:style-name="P837"><text:span text:style-name="T1527">🔑 핵심 키워드: 밝은 마음, 증휘, 오렌지빛 광명, 의식의 심화, 가을하늘</text:span><text:span/></text:p>
      <text:p text:style-name="P838"><text:span text:style-name="T1528">🌅 의식의 한 단계 더 깊은 융합</text:span><text:span/></text:p>
      <text:p text:style-name="P839"><text:span text:style-name="T1529">이전 단계에서 경험했던 서른세 가지 자성의 밝은 마음과 이를 움직이던 미세한 생명의 바람이 다음 단계로 넘어가는 과정이야. 이 에너지는 더 깊고 강력한 마흔 가지 자성의 한층 밝은 마음 속으로 스스로를 녹여내지. 컴퓨터로 치면 기본 고화질 모드에서 주변의 불필요한 연산을 모두 끄고 오직 핵심 그래픽 엔진만 풀가동하는 초고화질 모드로 전환되는 순간과 같아.</text:span><text:span/></text:p>
      <text:p text:style-name="P840"><text:span text:style-name="T1530">🧡 증휘의 출현과 의식의 확장</text:span><text:span/></text:p>
      <text:p text:style-name="P841"><text:span text:style-name="T1531">마음이 한 단계 더 깊게 은멸하면서 비로소 증휘라고 불리는 더 높은 차원의 밝은 의식이 눈을 뜨게 돼. 이 상태는 이전의 그 어떤 의식 상태보다 훨씬 투명하고 거대한 느낌을 주지.</text:span><text:span/></text:p>
      <text:p text:style-name="P842"><text:span text:style-name="T1532">의식 전환의 핵심 특징</text:span><text:span/></text:p>
      <text:list text:style-name="WWNum56" text:continue-numbering="true">
        <text:list-item>
          <text:p text:style-name="P843"><text:span text:style-name="T1533">단계의 변화: 밝은 마음에서 한층 밝은 마음으로 심화</text:span><text:span/></text:p>
        </text:list-item>
        <text:list-item>
          <text:p text:style-name="P844"><text:span text:style-name="T1534">의식의 밀도: 물질적 자극이 사라져 앞서보다 더욱 맑아짐</text:span><text:span/></text:p>
        </text:list-item>
        <text:list-item>
          <text:p text:style-name="P845"><text:span text:style-name="T1535">공간의 상태: 끝없이 투명하고 온전히 텅 빈 고요함 유지</text:span><text:span/></text:p>
        </text:list-item>
      </text:list>
      <text:p text:style-name="P846"><text:span text:style-name="T1536">🍂 청명한 가을하늘과 태양의 은유</text:span><text:span/></text:p>
      <text:p text:style-name="P847"><text:span text:style-name="T1537">이 경이로운 정신적 변화를 아주 아름다운 자연 현상으로 비유할 수 있어. 티 없이 맑고 깨끗한 가을하늘에 따스하고 강렬한 햇빛이 빈틈없이 가득 찬 풍경과 같다고 해. 구름 한 점 없는 높은 하늘에 온 세상이 빛으로 물드는 것처럼, 오염물질이 모두 가라앉은 순수한 의식의 공간에 거대한 깨달음의 빛이 가득 차오르는 모습을 상상하면 돼.</text:span><text:span/></text:p>
      <text:p text:style-name="P848"><text:span text:style-name="T1538">🔴 고요함 속에 울려 퍼지는 오렌지빛 광명</text:span><text:span/></text:p>
      <text:p text:style-name="P849"><text:span text:style-name="T1539">이 투명하게 비어 있는 마음의 우주 공간 속에 마침내 신비로운 붉은 광명과 오렌지 빛이 온통 차오르기 시작해. 이것은 단순히 눈으로 보는 시각적 빛이 아니라, 의식 자체가 붉고 따뜻한 에너지로 충만해지는 내면의 체험이야. 노을이 아름답게 물드는 저녁하늘을 바라볼 때 가슴이 먹먹할 정도로 고요해지는 것처럼, 존재의 가장 깊은 곳에서 거대하고 고요한 우주의 빛을 마주하게 되는 지점이지.</text:span><text:span/></text:p>
      <text:p text:style-name="P850"><text:span text:style-name="T1540">📝 핵심 요약</text:span><text:span/></text:p>
      <text:list text:style-name="WWNum56" text:continue-numbering="true">
        <text:list-item>
          <text:p text:style-name="P851"><text:span text:style-name="T1541">서른세 가지 자성의 밝은 마음과 생명의 바람이 마흔 가지 자성의 한층 밝은 마음인 증휘로 은멸한다.</text:span><text:span/></text:p>
        </text:list-item>
        <text:list-item>
          <text:p text:style-name="P852"><text:span text:style-name="T1542">이 과정에서 의식은 이전보다 훨씬 더 투명하고 텅 빈 고요한 상태를 맞이한다.</text:span><text:span/></text:p>
        </text:list-item>
        <text:list-item>
          <text:p text:style-name="P853"><text:span text:style-name="T1543">이 상태는 청명한 가을하늘에 햇빛이 가득 찬 것과 같은 선명한 비유로 설명된다.</text:span><text:span/></text:p>
        </text:list-item>
        <text:list-item>
          <text:p text:style-name="P854"><text:span text:style-name="T1544">최종적으로 텅 빈 내면의 의식 공간 속에 붉은 광명과 오렌지 빛이 가득 차오르게 된다.</text:span><text:span/></text:p>
        </text:list-item>
      </text:list>
      <text:p text:style-name="P855"><text:span><text:soft-page-break/></text:span><text:span/></text:p>
      <text:p text:style-name="P856"><text:span text:style-name="T1545">47. 붉은 에너지의 상승과 내면의 태양</text:span><text:span/></text:p>
      <text:p text:style-name="P857"><text:span text:style-name="T1546">🔑 핵심 키워드: 중맥 하단, 배꼽 짜끄라, 적보리심, 증휘와 극공</text:span><text:span/></text:p>
      <text:p text:style-name="P858"><text:span text:style-name="T1547">☀️ 심장 아래쪽에 묶여 있던 좌우의 미세한 에너지 통로들이 마침내 풀리고, 그곳을 흐르던 생명의 바람들이 중심 통로인 중맥의 아랫부분으로 거세게 모여들어. 이 강력한 압력 덕분에 성기와 배꼽 부위를 강하게 압박하고 있던 에너지 매듭들이 차례대로 스르륵 풀려나가지. 이것은 꽉 막혀 있던 수로의 매듭을 풀어주어 아래에 고여 있던 물이 강력한 수압을 타고 거침없이 위로 솟구치기 시작하는 과정과 아주 비슷해.</text:span><text:span/></text:p>
      <text:p text:style-name="P859"><text:span text:style-name="T1548">🔥 매듭이 풀리는 순간, 배꼽 짜끄라 중심에 잠들어 있던 어머니로부터 물려받은 붉은 에너지인 적보리심이 깨어나게 돼. 범어의 짧은 아 자 모양을 한 이 에너지는 본래 뜨거운 불의 성질을 지니고 있어서, 매듭이 풀리자마자 심장 부위의 여섯 겹 매듭 바로 아래까지 자석에 이끌리듯 스르르 위로 상하 운동을 시작하지. 마치 차가운 공기를 데운 열기구가 하늘을 향해 가뿐하게 떠오르는 것처럼, 내면의 화력이 척추 중심을 타고 수직으로 상승하는 영적인 도약이야.</text:span><text:span/></text:p>
      <text:p text:style-name="P860"><text:span text:style-name="T1549">🌅 이 붉은 에너지가 심장을 향해 올라가는 과정에서, 수행자의 의식 속에는 강렬한 붉은색이나 주황색의 빛이 온 세상을 가득 채우는 신비로운 환영이 펼쳐져. 사방이 탁 트인 광활한 대지 위로 이른 아침의 강렬한 태양이 붉은 햇빛을 뿜어내며 대기를 물들이는 것과 같은 장엄한 풍경이지. 하지만 이것은 눈을 떠서 바깥의 햇빛을 보는 게 아니라, 외부의 모든 감각이 차단된 상태에서 오직 내면의 거울에만 비치는 순수한 정신적 광명이야.</text:span><text:span/></text:p>
      <text:p text:style-name="P861"><text:span text:style-name="T1550">🌌 밀교에서는 이 경이로운 단계를 한층 더 밝아졌다는 뜻에서 증휘라고 부르고, 거친 의식과 기운이 사라진 깊은 공성을 뜻해서 극공이라고 정의해. 생각의 파도가 완전히 가라앉고 오직 붉은 빛의 순수한 떨림만 남은 상태인데, 이는 우리의 마음이 무거운 껍데기를 벗고 본질에 한 걸음 더 가까워졌음을 의미하지. 이 내면의 붉은 노을을 명확하게 인지하고 통제하는 능력을 키울 때, 우리의 영적 상태는 한층 더 단단하고 깊게 완성되는 거야.</text:span><text:span/></text:p>
      <text:p text:style-name="P862"><text:span text:style-name="T1551">📝 핵심 요약</text:span><text:span/></text:p>
      <text:list text:style-name="WWNum57" text:continue-numbering="true">
        <text:list-item>
          <text:p text:style-name="P863"><text:span text:style-name="T1552">심장 아래의 기운이 중맥 하단으로 모이면서 성기와 배꼽의 에너지 매듭이 풀린다.</text:span><text:span/></text:p>
        </text:list-item>
        <text:list-item>
          <text:p text:style-name="P864"><text:span text:style-name="T1553">배꼽에 있던 불 성질의 붉은 에너지가 심장 매듭 바로 아래까지 수직으로 상승한다.</text:span><text:span/></text:p>
        </text:list-item>
        <text:list-item>
          <text:p text:style-name="P865"><text:span text:style-name="T1554">의식 내부에서는 외부의 햇빛과 무관한 강렬한 주황색과 붉은색의 내적 광명이 펼쳐진다.</text:span><text:span/></text:p>
        </text:list-item>
        <text:list-item>
          <text:p text:style-name="P866"><text:span text:style-name="T1555">거친 감각과 바람이 사라진 이 고요하고 선명한 상태를 밀교에서는 증휘와 극공이라 부른다.</text:span><text:span/></text:p>
        </text:list-item>
      </text:list>
      <text:p text:style-name="P867"><text:span><text:soft-page-break/></text:span><text:span/></text:p>
      <text:p text:style-name="P868"><text:span text:style-name="T1556">[🟢 Online Mode | 26.06.01_12:54:15]</text:span><text:span/></text:p>
      <text:p text:style-name="P869"><text:span text:style-name="T1557">48. 깊은 고요함 속으로 침잠하는 흑광의 무대</text:span><text:span/></text:p>
      <text:p text:style-name="P870"><text:span text:style-name="T1558">🔑 핵심 키워드: 증득의 은멸, 근득의 발생, 흑광의 출현, 가을하늘과 어둠</text:span><text:span/></text:p>
      <text:p text:style-name="P871"><text:span text:style-name="T1559">🌌 한 단계 더 깊은 내면으로의 침잠</text:span><text:span/></text:p>
      <text:p text:style-name="P872"><text:span text:style-name="T1560">증득의 마음인 한층 밝은 마음과 그것을 태우고 움직이던 생명의 바람이 이제 힘을 다하고, 다음 단계인 근득의 마음으로 녹아드는 순간이야. 의식의 밀도가 급격하게 변하면서 영혼은 한층 더 깊고 아득한 심연을 향해 내려가게 되지. 이건 격렬하게 대도시를 달리던 자동차가 시동을 완전히 끄고 관성에 의해 스르륵 멈춰 서며 주변의 모든 소음이 일시에 가라앉는 고요함의 시작과 아주 비슷해.</text:span><text:span/></text:p>
      <text:p text:style-name="P873"><text:span text:style-name="T1561">🏙️ 청명한 가을하늘을 덮는 밤의 장막</text:span><text:span/></text:p>
      <text:p text:style-name="P874"><text:span text:style-name="T1562">이 근득의 상태가 시작되는 초반에는 마음의 스크린에 아주 독특하고 압도적인 풍경이 펼쳐지게 돼. 티끌 하나 없이 맑고 투명하던 청명한 가을하늘에 순식간에 짙고 무거운 밤의 장막이 내려앉으며 온 우주를 새까맣게 뒤덮는 듯한 현상이지. 어떤 빛이나 형상도 보이지 않는 완전히 텅 빈 공간 속에 거대한 어둠이 찾아오는 신비로운 경험이라고 이해하면 돼.</text:span><text:span/></text:p>
      <text:p text:style-name="P875"><text:span text:style-name="T1563">🔌 극장 상영이 끝나고 찾아오는 암전</text:span><text:span/></text:p>
      <text:p text:style-name="P876"><text:span text:style-name="T1564">우리가 극장에서 영화를 몰입해서 보다가 영화가 완전히 끝나고 객석의 메인 조명이 켜지기 바로 직전, 사방이 일시에 새까맣게 변하는 암전의 순간을 떠올려봐. 모든 시각 정보와 소리가 뚝 끊어지면서 오직 나의 존재감만 덩거리니 남는 그 짧은 찰나처럼, 의식은 외부의 모든 자극을 완벽히 차단한 채 온전한 고요 속의 흑광을 마주하게 되는 거야.</text:span><text:span/></text:p>
      <text:p text:style-name="P877"><text:span text:style-name="T1565">💎 정광명을 맞이하기 위한 마지막 준비</text:span><text:span/></text:p>
      <text:p text:style-name="P878"><text:span text:style-name="T1566">이 텅 빈 흑광의 상태는 단순한 의식의 소멸이나 무기력한 상태가 아니라, 우주의 근본 빛인 정광명을 만나기 바로 직전의 가장 엄숙한 대기실과 같아. 가장 깊은 한밤중의 어둠이 지나야 비로소 찬란한 새벽빛이 찾아오는 자연의 순리처럼, 마음이 거친 모든 물질적 껍데기를 완전히 벗어던지고 순수한 깨달음의 본질로 들어가기 위해 반드시 거쳐야 하는 성스러운 관문이지.</text:span><text:span/></text:p>
      <text:p text:style-name="P879"><text:span text:style-name="T1567">📝 핵심 요약</text:span><text:span/></text:p>
      <text:list text:style-name="WWNum58" text:continue-numbering="true">
        <text:list-item>
          <text:p text:style-name="P880"><text:span text:style-name="T1568">한층 밝은 마음인 증득과 생명의 바람이 정광명에 가까운 마음인 근득의 상태로 은멸함.</text:span><text:span/></text:p>
        </text:list-item>
        <text:list-item>
          <text:p text:style-name="P881"><text:span text:style-name="T1569">근득의 마음이 발생하는 초반에는 맑은 가을하늘에 짙은 어둠이 덮이듯 텅 빈 흑광이 나타남.</text:span><text:span/></text:p>
        </text:list-item>
        <text:list-item>
          <text:p text:style-name="P882"><text:span text:style-name="T1570">이는 극장의 전원이 차단되어 순간적인 암전이 찾아오는 것처럼 외부 자극이 차단되는 현상임.</text:span><text:span/></text:p>
        </text:list-item>
        <text:list-item>
          <text:p text:style-name="P883"><text:span text:style-name="T1571">우주의 근본 빛인 정광명으로 나아가기 위해 거친 의식을 모두 씻어내는 마지막 대기 단계임.</text:span><text:span/></text:p>
        </text:list-item>
      </text:list>
      <text:p text:style-name="P884"><text:span><text:soft-page-break/></text:span><text:span/></text:p>
      <text:p text:style-name="P885"><text:span text:style-name="T1572">49. 심장 매듭의 해제와 음양 명점의 위대한 만남</text:span><text:span/></text:p>
      <text:p text:style-name="P886"><text:span text:style-name="T1573">🔑 핵심 키워드: 심장 매듭, 백정·적정, 불괴명점, 근득(대공)</text:span><text:span/></text:p>
      <text:p text:style-name="P887"><text:span text:style-name="T1574">🪢 상하 에너지의 합일과 심장 매듭의 해제</text:span><text:span/></text:p>
      <text:p text:style-name="P888"><text:span text:style-name="T1575">우리 몸의 중심 통로인 중맥 안에서 위아래로 흐르던 모든 생명의 바람들이 마침내 심장 쪽으로 강하게 모여들기 시작해. 이 강력한 기류의 힘이 한곳으로 집중되면서, 평소 심장 부위를 꽁꽁 묶고 있던 좌우 맥도의 여섯 개 매듭이 마법처럼 스르륵 풀리게 되지. 굳게 닫혀 있던 비밀 금고의 복잡한 잠금장치가 양쪽에서 서서히 조여오는 거대한 압력에 의해 툭 하고 해제되는 극적인 순간과 같아.</text:span><text:span/></text:p>
      <text:p text:style-name="P889"><text:span text:style-name="T1576">💧 두 개의 보리심, 백정과 적정의 대이동</text:span><text:span/></text:p>
      <text:p text:style-name="P890"><text:span text:style-name="T1577">심장의 매듭이 풀리는 순간, 머리 높은 곳에 머물던 순수한 하얀색 보리심(백정)은 중맥을 타고 아래로 내려오고, 아랫배 저 밑에 있던 붉은색 보리심(적정)은 위를 향해 일제히 올라가게 돼. 하늘의 은하수와 땅의 마그마가 서로를 향해 정면으로 교차하며 이동하는 거대한 장관이 우리 몸 내부에서 일어나는 셈이지. 이 두 에너지는 오직 심장이라는 단 하나의 종착지를 향해 아주 정교하게 움직여.</text:span><text:span/></text:p>
      <text:p text:style-name="P891"><text:span text:style-name="T1578">📦 불괴명점이라는 비밀 상자 속의 결합</text:span><text:span/></text:p>
      <text:p text:style-name="P892"><text:span text:style-name="T1579">이렇게 마주 보며 이동한 백정과 적정은 심장 한가운데에 위치한 영혼의 핵심 거점인 '불괴명점' 속으로 쏙 들어가서 마침내 하나로 만나게 돼. 이 공간은 마치 두 개의 작은 찻잔이나 종지를 위아래로 빈틈없이 맞붙여 놓은 아주 미세한 비밀 상자 같은 구조를 지니고 있어. 우주의 음과 양을 상징하는 두 기류가 이 절대 깨지지 않는 단단한 캡슐 안에서 완벽하게 융합되는 거란다.</text:span><text:span/></text:p>
      <text:p text:style-name="P893"><text:span text:style-name="T1580">🌌 외부의 암흑이 아닌 내면의 거대한 고요, 대공</text:span><text:span/></text:p>
      <text:p text:style-name="P894"><text:span text:style-name="T1581">두 에너지가 결합하면 의식 속에는 눈앞이 캄캄해지는 거대한 어둠이 찾아오는데, 이건 눈이 멀어 무서워지는 밤이 아니라 모든 잡념과 거친 생각이 사라져서 나타나는 '대공'의 상태야. 영화가 시작되기 직전 불이 완전히 꺼진 극장 안처럼 세상의 모든 소음이 차단된 것 같지만, 사실은 궁극의 지혜인 정광명이라는 밝은 빛을 맞이하기 바로 직전의 가장 청정한 고요함인 거지. 외부에서 오는 어둠이 아니라 우리 마음의 가장 깊은 본질에 도달했을 때(근득) 마주하는 신비</text:span><text:span text:style-name="T1582">로운 내면 현상이야.</text:span><text:span/></text:p>
      <text:p text:style-name="P895"><text:span text:style-name="T1583">📝 핵심 요약</text:span><text:span/></text:p>
      <text:list text:style-name="WWNum59" text:continue-numbering="true">
        <text:list-item>
          <text:p text:style-name="P896"><text:span text:style-name="T1584">중맥의 상하 기류가 심장으로 모여들어 심장을 감싼 여섯 개의 맥도 매듭을 풀어냄</text:span><text:span/></text:p>
        </text:list-item>
        <text:list-item>
          <text:p text:style-name="P897"><text:span text:style-name="T1585">상부의 하얀 보리심(백정)은 내려가고 하부의 붉은 보리심(적정)은 올라오는 대이동이 일어남</text:span><text:span/></text:p>
        </text:list-item>
        <text:list-item>
          <text:p text:style-name="P898"><text:span text:style-name="T1586">두 보리심이 심장 중심에 종지를 맞붙인 모양으로 존재하는 불괴명점 안에서 융합함</text:span><text:span/></text:p>
        </text:list-item>
        <text:list-item>
          <text:p text:style-name="P899"><text:span text:style-name="T1587">이 결합으로 모든 거친 마음이 사라져 내면의 거대한 고요(대공)와 정광명에 가까운 상태(근득)를 경험함</text:span><text:span/></text:p>
        </text:list-item>
      </text:list>
      <text:p text:style-name="P900"><text:span><text:soft-page-break/></text:span><text:span/></text:p>
      <text:p text:style-name="P901"><text:span text:style-name="T1588">50. 정광명에 가까운 마음과 죽음의 빛 출현</text:span><text:span/></text:p>
      <text:p text:style-name="P902"><text:span text:style-name="T1589">🔑 핵심 키워드: 정광명에 가까운 마음, 혼절의 암흑, 객진풍심, 극도로 미세한 풍심, 죽음의 정광명</text:span><text:span/></text:p>
      <text:p text:style-name="P903"><text:span text:style-name="T1590">🌓 밝음에서 완전한 어둠으로의 전환</text:span><text:span/></text:p>
      <text:p text:style-name="P904"><text:span text:style-name="T1591">마음이 죽음의 가장 깊은 본질에 가까워질 때, 우리는 정광명에 가까운 마음이라는 독특한 단계를 지나게 돼. 이 단계의 처음에는 주변의 대상을 어렴풋이 인식할 수 있지만, 후반부로 갈수록 의식이 완전히 끊어지며 칠흑 같은 암흑 속에 빠져들게 되지. 마치 밝게 켜져 있던 극장의 조명이 서서히 어두워지다가, 마침내 아무것도 보이지 않는 완전한 암전 상태가 되는 것과 똑같아. 이 깊은 어둠은 더 큰 깨달음으로 나아가기 위해 거치는 필수적인 통로야.</text:span><text:span/></text:p>
      <text:p text:style-name="P905"><text:span text:style-name="T1592">🍂 표면의 모든 움직임이 멈추는 순간</text:span><text:span/></text:p>
      <text:p text:style-name="P906"><text:span text:style-name="T1593">암흑의 상태에 이르면 우리 마음의 표면을 출렁이게 만들었던 모든 거친 생각과 에너지들이 비로소 작동을 멈추게 돼. 홀연히 일어났던 이전의 모든 생명의 바람과 마음들이 소멸하는 과정이지. 바람이 세차게 불어 거칠게 흔들리던 호수의 물결이 완전히 가라앉아 거울처럼 잔잔해지는 모습과 같단다. 이 단계에서 거친 에너지가 모두 가라앉으면서 우리의 정신적 구조는 한 번도 경험하지 못한 완전히 새로운 차원의 성장을 준비해.</text:span><text:span/></text:p>
      <text:p text:style-name="P907"><text:span text:style-name="T1594">🌌 의식이 사라진 고요한 공백의 시간</text:span><text:span/></text:p>
      <text:p text:style-name="P908"><text:span text:style-name="T1595">모든 표면적인 마음이 사라진 뒤에는 의식이 전혀 없는 혼절과 같은 상태가 한동안 지속되어 흘러가. 이 공백은 아무것도 없는 무의 상태가 아니라, 가장 깊은 곳에 숨겨진 보물을 깨우기 위해 잠시 숨을 고르는 시간이야. 마치 컴퓨터를 완벽하게 새로 시작하기 위해 전원을 잠시 끄고 일시적인 모든 데이터가 완전히 지워지기를 기다리는 짧은 정지 상태와 아주 비슷하지. 본초부터 숨어 있던 가장 깊은 에너지가 깨어나기 전까지 이 고요한 침묵은 묵묵히 제자리를 지키게 </text:span><text:span text:style-name="T1596">돼.</text:span><text:span/></text:p>
      <text:p text:style-name="P909"><text:span text:style-name="T1597">☀️ 원초의 기억 소생과 정광명의 탄생</text:span><text:span/></text:p>
      <text:p text:style-name="P910"><text:span text:style-name="T1598">마침내 깊은 잠에서 깨어나듯 우리 존재의 가장 뿌리에 있던 극도로 미세한 풍심의 기억이 소생하기 시작해. 이 원초의 에너지가 깨어나는 순간, 마침내 죽음의 정광명이라는 온 우주를 채우는 태초의 깨끗한 빛이 눈부시게 출현하지. 깊은 밤의 어둠이 끝나고 지평선 너머로 거대한 태양이 떠오르며 온 세상을 황금빛으로 물들이는 것처럼 말이야. 이 빛을 마주하는 것이야말로 생사의 윤회를 벗어나 진정한 자유를 얻는 가장 위대한 순간이란다.</text:span><text:span/></text:p>
      <text:p text:style-name="P911"><text:span text:style-name="T1599">📝 핵심 요약</text:span><text:span/></text:p>
      <text:list text:style-name="WWNum60" text:continue-numbering="true">
        <text:list-item>
          <text:p text:style-name="P912"><text:span text:style-name="T1600">정광명에 가까운 마음의 후반부에는 의식이 완전히 끊어지는 암흑 속의 혼절 상태를 경험한다.</text:span><text:span/></text:p>
        </text:list-item>
        <text:list-item>
          <text:p text:style-name="P913"><text:span text:style-name="T1601">이 단계에서 표면적으로 일어났던 모든 거친 바람과 마음들이 완전히 소멸한다.</text:span><text:span/></text:p>
        </text:list-item>
        <text:list-item>
          <text:p text:style-name="P914"><text:span text:style-name="T1602">본초부터 존재하던 기본의 극도로 미세한 풍심에서 기억이 소생하기 전까지 의식이 없는 상태가 유지된다.</text:span><text:span/></text:p>
        </text:list-item>
        <text:list-item>
          <text:p text:style-name="P915"><text:span text:style-name="T1603">미세한 풍심의 기억이 소생하면서 원초의 빛인 죽음의 정광명이 출현한다.</text:span><text:span/></text:p>
        </text:list-item>
      </text:list>
      <text:p text:style-name="P916"><text:span><text:soft-page-break/></text:span><text:span/></text:p>
      <text:p text:style-name="P917"><text:span text:style-name="T1604">[🟢 Online Mode | 26.06.01_13:59:38]</text:span><text:span/></text:p>
      <text:p text:style-name="P918"><text:span text:style-name="T1605">51. 가을 밤하늘의 달빛과 이원성 분별이 사라진 투명한 의식</text:span><text:span/></text:p>
      <text:p text:style-name="P919"><text:span text:style-name="T1606">🔑 핵심 키워드: 현명, 33자성의 밝은 마음, 가을 밤하늘의 달빛, 이원의 분별 정지</text:span><text:span/></text:p>
      <text:p text:style-name="P920"><text:span text:style-name="T1607">🌪️ 허망한 분별의 폭풍이 지나간 자리</text:span><text:span/></text:p>
      <text:p text:style-name="P921"><text:span text:style-name="T1608">일상의 시끄러운 생각과 허망한 분별의 움직임들이 모두 은멸한 뒤에 이 현명의 상태가 찾아와. 마치 낮 동안 도로를 가득 채웠던 수많은 자동차와 소음들이 깊은 밤이 되면서 일제히 사라지고 고요함만 남는 것과 같지. 복잡한 뇌의 연산 장치들이 잠시 작동을 멈추고 온전한 휴식 상태로 들어가는 첫 번째 길목이라고 볼 수 있어.</text:span><text:span/></text:p>
      <text:p text:style-name="P922"><text:span text:style-name="T1609">🌕 청명한 가을 밤하늘을 채운 달빛</text:span><text:span/></text:p>
      <text:p text:style-name="P923"><text:span text:style-name="T1610">이 단계에서 느껴지는 의식의 모습은 구름 한 점 없이 맑고 청명한 가을 밤하늘에 하얀 달빛이 가득 차 있는 풍경과 아주 흡사해. 어두운 방에 은은한 스탠드 조명을 켜두면 방 안의 물건들이 자극적이지 않고 부드럽게 드러나듯이, 어떤 오염도 없는 청정한 공간 속에 오직 하얀 광명만이 은은하게 빛나는 평화로운 상태야.</text:span><text:span/></text:p>
      <text:p text:style-name="P924"><text:span text:style-name="T1611">⚖️ 내 편과 네 편이 사라진 통짜 거울</text:span><text:span/></text:p>
      <text:p text:style-name="P925"><text:span text:style-name="T1612">여기서는 좋다 싫다, 나다 너다 하는 거친 이원적인 분별들이 더 이상 일어나지 않아. 평소에는 거울에 때가 묻어 있어서 사물을 왜곡해 보거나 분리해서 보았다면, 지금은 거울면 자체가 완벽하게 닦여서 세상을 있는 그대로 비추는 상태지. 주관과 객관의 구별이 사라진 완전한 통짜 의식의 세계가 눈앞에 펼쳐지는 거야.</text:span><text:span/></text:p>
      <text:p text:style-name="P926"><text:span text:style-name="T1613">🌊 파도가 가라앉아 바닥이 보이는 호수</text:span><text:span/></text:p>
      <text:p text:style-name="P927"><text:span text:style-name="T1614">결국 33자성의 밝은 마음인 현명은 감정의 거친 파도가 모두 가라앉아 호수 깊은 바닥까지 투명하게 들여다보이는 고요함의 극치야. 성냄에서 비롯된 거친 에너지들이 미세한 빛으로 정화되면서, 우리는 비로소 마음의 본래 바탕이 얼마나 깨끗하고 투명했는지를 이 하얀 광명의 공간 속에서 생생하게 경험하게 돼.</text:span><text:span/></text:p>
      <text:p text:style-name="P928"><text:span text:style-name="T1615">📝 핵심 요약</text:span><text:span/></text:p>
      <text:list text:style-name="WWNum61" text:continue-numbering="true">
        <text:list-item>
          <text:p text:style-name="P929"><text:span text:style-name="T1616">현명은 허망한 분별심이 사라지고 새로운 움직임이 일어나기 전의 청정한 상태야.</text:span><text:span/></text:p>
        </text:list-item>
        <text:list-item>
          <text:p text:style-name="P930"><text:span text:style-name="T1617">청명한 가을 밤하늘에 달빛이 가득 찬 것 같은 하얀 광명으로 의식이 채워져.</text:span><text:span/></text:p>
        </text:list-item>
        <text:list-item>
          <text:p text:style-name="P931"><text:span text:style-name="T1618">나물과 고기, 내 편과 네 편을 가르는 거친 이원적 분별이 완전히 정지해.</text:span><text:span/></text:p>
        </text:list-item>
        <text:list-item>
          <text:p text:style-name="P932"><text:span text:style-name="T1619">감정의 파도가 가라앉아 본래의 투명함을 회복한 식온의 첫 번째 단계야.</text:span><text:span/></text:p>
        </text:list-item>
      </text:list>
      <text:p text:style-name="P933"><text:span><text:soft-page-break/></text:span><text:span/><text:span/></text:p>
      <text:p text:style-name="P934"><text:span text:style-name="T1620">52. 증휘의 단계와 붉은 광명의 세계</text:span><text:span/></text:p>
      <text:p text:style-name="P935"><text:span text:style-name="T1621">🔑 핵심 키워드: 증휘, 붉은 광명, 가을하늘, 이원성 소멸, 미세한 의식</text:span><text:span/></text:p>
      <text:p text:style-name="P936"><text:span text:style-name="T1622">🌅 가을하늘에 가득 찬 붉은 노을빛</text:span><text:span/></text:p>
      <text:p text:style-name="P937"><text:span text:style-name="T1623">하얀 광명의 단계를 지나면 의식은 한층 더 깊고 밝은 증휘라는 단계로 접어들게 돼. 이 상태는 오염물이 전혀 없는 청명한 가을하늘에 강렬한 햇빛이 가득 쏟아지는 풍경과 같아. 온 세상이 투명하고 고요한 가운데 오직 붉은 광명만이 가득하게 울려 퍼지는 아주 신비롭고 아름다운 의식의 스펙트럼이지. 이전의 하얀 빛이 새벽녘의 맑은 여명이었다면, 이번 단계는 대지를 온통 붉게 물들이는 장엄한 저녁노을과 비슷하다고 볼 수 있어.</text:span><text:span/></text:p>
      <text:p text:style-name="P938"><text:span text:style-name="T1624">⏱️ 폭풍 전야와 같은 완벽한 멈춤의 시간</text:span><text:span/></text:p>
      <text:p text:style-name="P939"><text:span text:style-name="T1625">이 경지는 허망한 분별심의 움직임이 완벽하게 은멸하고, 새로운 생각이 다시 꿈틀거리기 바로 직전의 미세한 틈새에서 발생해. 일상생활에 비유하자면, 시끄럽게 돌아가던 거대한 기계 장치를 끄고 난 직후에 찾아오는 완벽한 정적의 순간이지. 생각이 완전히 끊어진 진공 상태와 같아서, 마음의 미세한 본질이 아무런 방해도 받지 않고 온전하게 드러날 수 있는 아주 특별한 시간적 공간이 열리는 거야.</text:span><text:span/></text:p>
      <text:p text:style-name="P940"><text:span text:style-name="T1626">💎 마흔 가지 미세한 마음의 정화</text:span><text:span/></text:p>
      <text:p text:style-name="P941"><text:span text:style-name="T1627">불교에서는 이 단계를 40자성의 밝은 마음이라고 불러. 우리가 평소에 품고 있던 수많은 감정과 미세한 생각의 성향들이 단 40가지의 순수한 에너지 형태로 압축되어 녹아든 상태야. 복잡하게 뒤엉켜 있던 컴퓨터 코드가 단 몇 줄의 핵심 알고리즘으로 요약되는 과정과 비슷하지. 거친 생각들은 모두 깨끗하게 걸러지고, 오직 의식의 가장 미세하고 본질적인 부분만 남아서 다음 차원의 깨달음을 향해 나아갈 준비를 하게 돼.</text:span><text:span/></text:p>
      <text:p text:style-name="P942"><text:span text:style-name="T1628">🛑 나와 너의 구분이 사라진 이원의 소멸</text:span><text:span/></text:p>
      <text:p text:style-name="P943"><text:span text:style-name="T1629">이 증휘의 의식 상태에서는 나와 대상을 구별하는 거친 이원적인 분별들이 전혀 일어나지 않아. 평소에는 나와 너, 좋은 것과 싫은 것, 안과 밖을 끝없이 나누며 갈등하지만, 이 자리에 이르면 그런 분리감이 눈 녹듯 사라져 버리지. 마치 한 방울의 물이 거대한 바다에 떨어져 바다 그 자체가 되는 것처럼, 주관과 객관의 경계가 무너지고 오직 붉은 광명의 텅 빈 고요함만이 홀로 빛나게 되는 거야.</text:span><text:span/></text:p>
      <text:p text:style-name="P944"><text:span text:style-name="T1630">📝 핵심 요약</text:span><text:span/></text:p>
      <text:list text:style-name="WWNum62" text:continue-numbering="true">
        <text:list-item>
          <text:p text:style-name="P945"><text:span text:style-name="T1631">하얀 광명에 이어 나타나는 증휘의 단계는 햇빛이 가득한 가을하늘처럼 붉은 광명이 치솟는 상태이다.</text:span><text:span/></text:p>
        </text:list-item>
        <text:list-item>
          <text:p text:style-name="P946"><text:span text:style-name="T1632">허망한 분별의 움직임이 사라지고 새로운 생각이 일어나기 전의 미세한 틈새에서 발생한다.</text:span><text:span/></text:p>
        </text:list-item>
        <text:list-item>
          <text:p text:style-name="P947"><text:span text:style-name="T1633">40자성의 밝은 마음으로 불리며, 거친 의식들이 순수한 본질적 에너지로 압축되는 과정이다.</text:span><text:span/></text:p>
        </text:list-item>
        <text:list-item>
          <text:p text:style-name="P948"><text:span text:style-name="T1634">주관과 객관을 나누는 거친 이원의 분별이 완전히 소멸하여 완벽한 텅 빈 고요함을 경험한다.</text:span><text:span/></text:p>
        </text:list-item>
      </text:list>
      <text:p text:style-name="P949"><text:span><text:soft-page-break/></text:span><text:span/><text:span/></text:p>
      <text:p text:style-name="P950"><text:span text:style-name="T1635">53. 텅 빈 흑암 속의 절대 고요와 근득의 의식</text:span><text:span/></text:p>
      <text:p text:style-name="P951"><text:span text:style-name="T1636">🔑 핵심 키워드: 허망한 분별, 흑암의 현상, 이원성 소멸, 근득의 마음</text:span><text:span/></text:p>
      <text:p text:style-name="P952"><text:span text:style-name="T1637">🌌 분별이 멈추고 찾아오는 거대한 간격</text:span><text:span/></text:p>
      <text:p text:style-name="P953"><text:span text:style-name="T1638">세상을 이리저리 나누고 따지던 허망한 분별의 거친 움직임이 완전히 사라지고, 아직 새로운 의식의 흐름이 깨어나지 않은 그 오묘한 사이 공간에서 독특한 의식 상태가 피어나게 돼. 이것은 마치 복잡하게 돌아가던 거대한 기계 장치의 전원 버튼을 딱 껐을 때, 기계가 회전을 완전히 멈추고 완벽한 정적 속으로 빠져드는 그 찰나의 순간과 같아. 모든 생각의 잔상이 가라앉으면서 존재는 일찍이 경험해보지 못한 깊은 의식의 심연으로 진입하게 되지.</text:span><text:span/></text:p>
      <text:p text:style-name="P954"><text:span text:style-name="T1639">🌃 가을하늘을 뒤덮는 투명한 흑암의 비유</text:span><text:span/></text:p>
      <text:p text:style-name="P955"><text:span text:style-name="T1640">이 상태에서 마주하는 의식의 풍경은 아주 청명하고 높은 가을하늘에 한 줄기 빛도 없는 짙은 어둠이 밤의 시작처럼 통째로 뒤덮이는 모습과 매우 비슷하단다. 비록 사방이 온통 새까만 흑암으로 가득 차서 아무것도 보이지 않는 것 같지만, 탁하고 맹목적인 어둠이 아니라 아주 투명하고 텅 빈 고요함이 깊게 배어있는 상태야. 밤하늘에 별빛 하나, 불빛 하나 없지만 그 광대함과 맑은 공기만큼은 고스란히 느껴지는 고요한 한밤중의 벌판에 홀로 서 있는 느낌과도 같지.</text:span><text:span/></text:p>
      <text:p text:style-name="P956"><text:span text:style-name="T1641">🤫 이원의 경계가 사라진 절대적 침묵</text:span><text:span/></text:p>
      <text:p text:style-name="P957"><text:span text:style-name="T1642">여기서는 나와 너, 좋고 싫음, 옳고 그름을 나누던 거칠고 이원적인 분별들이 단 하나도 일어나지 않아. 평소 우리를 괴롭히던 수많은 비교와 판단의 목소리들이 완벽하게 차단되어 의식의 수면 위로 그 어떤 잔물결도 일지 않는단다. 칠흑 같은 어둠 속에서 주체와 객체의 분리가 희미해지며, 마음은 오직 텅 비어있음 그 자체와 깊은 어둠만을 온전히 비출 뿐이야. 어떤 소음도, 방해도 없는 완벽한 침묵 속에서 의식은 가장 단순하고도 순수한 상태로 정제되지.</text:span><text:span/></text:p>
      <text:p text:style-name="P958"><text:span text:style-name="T1643">🔑 정광명으로 나아가는 마지막 문턱</text:span><text:span/></text:p>
      <text:p text:style-name="P959"><text:span text:style-name="T1644">이렇게 모든 거친 분별이 소멸하고 투명한 흑암만이 흐르는 의식의 상태를 바로 일곱 번째 자성의 정광명에 가장 가까워진 마음, 즉 근득의 모습이라고 불러. 이는 아주 깊고 깊은 터널의 끝에서 완전한 빛의 세계로 걸어 나가기 직전, 터널 안의 가장 어둡고 고요한 지점을 통과하는 것과 같은 상태야. 존재가 물질과 생각의 허물을 모두 벗어던지고 가장 순수한 영성의 본질인 정광명을 맞이하기 위해 거쳐야 하는 엄숙하고도 신비로운 마지막 관문인 셈이지.</text:span><text:span/></text:p>
      <text:p text:style-name="P960"><text:span text:style-name="T1645">📝 핵심 요약</text:span><text:span/></text:p>
      <text:list text:style-name="WWNum63" text:continue-numbering="true">
        <text:list-item>
          <text:p text:style-name="P961"><text:span text:style-name="T1646">허망한 분별의 움직임이 멈추고 은멸하는 사이 공간에서 근득의 의식이 발생함.</text:span><text:span/></text:p>
        </text:list-item>
        <text:list-item>
          <text:p text:style-name="P962"><text:span text:style-name="T1647">청명한 가을하늘을 짙은 밤의 어둠이 통째로 덮은 것과 같은 투명한 흑암의 현상이 나타남.</text:span><text:span/></text:p>
        </text:list-item>
        <text:list-item>
          <text:p text:style-name="P963"><text:span text:style-name="T1648">너와 나를 나누는 거칠고 이원적인 분별이 완전히 사라져 일체의 생각이 일어나지 않음.</text:span><text:span/></text:p>
        </text:list-item>
        <text:list-item>
          <text:p text:style-name="P964"><text:span text:style-name="T1649">일곱 번째 자성인 정광명의 순수한 빛을 맞이하기 직전의 가장 가까워진 마음 상태를 뜻함.</text:span><text:span/></text:p>
        </text:list-item>
      </text:list>
      <text:p text:style-name="P965"><text:span><text:soft-page-break/></text:span><text:span/><text:span/></text:p>
      <text:p text:style-name="P966"><text:span text:style-name="T1650">54. 정광명의 발현과 본초적 의식의 회복</text:span><text:span/></text:p>
      <text:p text:style-name="P967"><text:span text:style-name="T1651">🔑 핵심 키워드: 정광명, 이원분별 소멸, 여명의 하늘빛, 공성 깨달음</text:span><text:span/></text:p>
      <text:p text:style-name="P968"><text:span text:style-name="T1652">🌅 기절에서 깨어나는 순수한 의식</text:span><text:span/></text:p>
      <text:p text:style-name="P969"><text:span text:style-name="T1653">정광명에 가까운 마음의 마지막 단계에서 겪었던 캄캄한 기절 상태가 마침내 걷히고, 우리 마음의 원초적인 빛인 정광명이 완전히 모습을 드러내는 순간이야. 깊은 잠에 빠져 아무것도 모르는 상태였다가, 알람 소리도 없이 아주 부드럽고 자연스럽게 눈이 떠지며 정신이 맑아지는 경험과 비슷해. 이때 거친 이분법적인 생각들이 완전히 사라지면서, 마음은 그 어느 때보다 투명하고 고요한 본래의 상태를 회복하게 되지.</text:span><text:span/></text:p>
      <text:p text:style-name="P970"><text:span text:style-name="T1654">🌤️ 세 가지 오염을 벗어난 여명의 하늘</text:span><text:span/></text:p>
      <text:p text:style-name="P971"><text:span text:style-name="T1655">이 단계에서 마음속에 펼쳐지는 풍경은 가을철 새벽녘의 하늘빛과 같아. 밤을 지배하던 달빛도, 낮을 밝히는 햇빛도, 그리고 한밤중의 짙은 어둠이라는 세 가지 방해 요소가 모두 사라진 상태지. 화려한 도시의 네온사인과 인공 조명을 모두 끄고, 오직 하늘 스스로가 가진 본연의 투명하고 푸르스름한 새벽빛만 남은 상태로 비유할 수 있어. 그 어떤 왜곡도 없는 완벽하게 텅 빈 고요함이 온 의식을 채우게 돼.</text:span><text:span/></text:p>
      <text:p text:style-name="P972"><text:span text:style-name="T1656">🧘 주객의 분리가 사라진 완벽한 평온</text:span><text:span/></text:p>
      <text:p text:style-name="P973"><text:span text:style-name="T1657">여기서는 나를 둘러싼 세상과 나를 나누어 보던 거친 분별심이 단 한 톨도 일어나지 않아. 평소에는 거울을 보며 거울과 나를 분리해서 생각했다면, 이제는 거울과 방 전체가 하나로 융합되어 경계선 자체가 지워진 것과 같지. 보는 자와 보이는 대상의 구분이 완전히 무너지면서 마음은 우주 전체와 온전히 하나가 되는 평화를 누리게 된단다.</text:span><text:span/></text:p>
      <text:p text:style-name="P974"><text:span text:style-name="T1658">☀️ 공성을 직접 목격하는 정광명의 지혜</text:span><text:span/></text:p>
      <text:p text:style-name="P975"><text:span text:style-name="T1659">이 투명한 광명은 온갖 망상과 집착이 멈추었을 때 자연스럽게 솟아나는 마음의 참된 성품이야. 이것은 수행자들이 깊은 삼매에 들어 우주의 본질인 공성을 눈앞에서 보듯 직접 깨닫는 싸마히따 상태와 완전히 일치해. 거센 폭풍우의 가장 중심부에 들어가면 바람 한 점 없이 고요하고 맑은 하늘이 숨겨져 있듯이, 우리 존재의 가장 깊은 중심에서 빛나는 절대적인 지혜의 빛을 마주하는 놀라운 경험이지.</text:span><text:span/></text:p>
      <text:p text:style-name="P976"><text:span text:style-name="T1660">📝 핵심 요약</text:span><text:span/></text:p>
      <text:list text:style-name="WWNum64" text:continue-numbering="true">
        <text:list-item>
          <text:p text:style-name="P977"><text:span text:style-name="T1661">어두운 기절 상태가 가라앉으면서 마음의 가장 순수한 본래 빛인 정광명이 깨어나.</text:span><text:span/></text:p>
        </text:list-item>
        <text:list-item>
          <text:p text:style-name="P978"><text:span text:style-name="T1662">달빛과 햇빛과 어둠이 모두 사라진 가을 새벽하늘처럼 오염 없는 텅 빈 투명함을 마주해.</text:span><text:span/></text:p>
        </text:list-item>
        <text:list-item>
          <text:p text:style-name="P979"><text:span text:style-name="T1663">주체와 객체를 나누던 이분법적 분별이 완전히 사라져 세상과의 경계가 허물어져.</text:span><text:span/></text:p>
        </text:list-item>
        <text:list-item>
          <text:p text:style-name="P980"><text:span text:style-name="T1664">폭풍의 중심처럼 고요한 상태에서 공성을 직접 깨닫는 싸마히따 지혜의 빛을 직접 목격하게 돼.</text:span><text:span/></text:p>
        </text:list-item>
      </text:list>
      <text:p text:style-name="P981"><text:span><text:soft-page-break/></text:span><text:span/><text:span/></text:p>
      <text:p text:style-name="P982"><text:span text:style-name="T1665">[🟢 Online Mode | 26.06.01_14:00:15]</text:span><text:span/></text:p>
      <text:p text:style-name="P983"><text:span text:style-name="T1666">55. 근원의 불꽃과 진정한 죽음의 광명</text:span><text:span/></text:p>
      <text:p text:style-name="P984"><text:span text:style-name="T1667">🔑 핵심 키워드: 불괴명점, 지명풍, 극미세 풍심, 죽음의 정광명, 일체공</text:span><text:span/></text:p>
      <text:p text:style-name="P985"><text:span text:style-name="T1668">💧 두 방울의 만남과 근원의 용해</text:span><text:span/></text:p>
      <text:p text:style-name="P986"><text:span text:style-name="T1669">몸 안에서 분리되어 흐르던 하얀 보리심과 붉은 보리심이 마침내 심장의 가장 깊은 곳에 위치한 영혼의 핵인 불괴명점 속으로 각각 완전히 녹아드는 단계야. 비유하자면 머나먼 길을 돌아온 두 줄기의 순수한 강물이 마침내 거대하고 깊은 바다의 중심에서 만나 하나로 완전히 합쳐지는 물리적 결합과 같지. 이 두 에너지가 본래의 제자리로 돌아가 숨어들면서, 생명의 가장 핵심적인 문이 열리게 돼.</text:span><text:span/></text:p>
      <text:p text:style-name="P987"><text:span text:style-name="T1670">🌪️ 미세한 바람의 최종 수렴</text:span><text:span/></text:p>
      <text:p text:style-name="P988"><text:span text:style-name="T1671">중맥 내부를 흐르던 모든 생명 에너지의 흐름인 바람들이 이제 가장 정밀하고 본질적인 생명의 숨결인 지명풍 속으로 한꺼번에 흡수되어 들어가.</text:span><text:span/></text:p>
      <text:list text:style-name="WWNum65" text:continue-numbering="true">
        <text:list-item>
          <text:p text:style-name="P989"><text:span text:style-name="T1672">에너지 상태: 거친 호흡과 관련된 모든 표면적 에너지가 완전히 정지함</text:span><text:span/></text:p>
        </text:list-item>
        <text:list-item>
          <text:p text:style-name="P990"><text:span text:style-name="T1673">진행 방식: 모든 잔여 동력이 하나의 궁극적인 중심점으로 빨려 들어감</text:span><text:span/></text:p>
        </text:list-item>
        <text:list-item>
          <text:p text:style-name="P991"><text:span text:style-name="T1674">직관적 비유: 집 안의 모든 전자제품과 전등을 하나씩 끄다가 마침내 메인 발전기의 마지막 스위치 하나만을 남겨둔 상태</text:span><text:span/></text:p>
        </text:list-item>
      </text:list>
      <text:p text:style-name="P992"><text:span text:style-name="T1675">이로 인해 겉으로 보이던 모든 생명 활동의 흔적들이 내부의 가장 깊은 핵으로 수렴되는 현상이 완성되지.</text:span><text:span/></text:p>
      <text:p text:style-name="P993"><text:span text:style-name="T1676">💡 태초부터 존재했던 근원 의식의 각성</text:span><text:span/></text:p>
      <text:p text:style-name="P994"><text:span text:style-name="T1677">모든 에너지가 수렴됨에 따라, 우리가 태어날 때부터 본질적으로 가지고 있었으나 평소에는 수많은 잡념과 분별심에 가려져 보이지 않던 극도로 미세한 풍심이 마침내 온전한 모습을 드러내게 돼. 이것은 마치 하늘을 두껍게 가리고 있던 거대한 먹구름과 안개가 완전히 걷히면서, 그 뒤에 항상 깨끗하게 빛나고 있던 순수한 다이아몬드가 마침내 제 빛을 발하는 상태와 똑같아. 오염되지 않은 생명 본연의 순수한 의식이 깨어나는 순간이지.</text:span><text:span/></text:p>
      <text:p text:style-name="P995"><text:span text:style-name="T1678">🌌 우주적 무대 뒤의 순수한 투명함</text:span><text:span/></text:p>
      <text:p text:style-name="P996"><text:span text:style-name="T1679">이 거대한 융합의 결과로 내면에는 그 어떤 어둠이나 분별도 없는 궁극의 정광명이 피어나는데, 이는 바깥의 텅 빈 하늘을 보는 것이 아니라 의식 자체가 빛으로 변한 상태야.</text:span><text:span/></text:p>
      <table:table table:style-name="ta7">
        <table:table-columns>
          <table:table-column table:style-name="co17"/>
          <table:table-column table:style-name="co18"/>
        </table:table-columns>
        <table:table-header-rows>
          <table:table-row table:style-name="ro21" table:default-cell-style-name="ce59">
            <table:table-cell table:style-name="ce60">
              <text:p text:style-name="P997"><text:span text:style-name="T1680">개념 구분</text:span><text:span/></text:p>
            </table:table-cell>
            <table:table-cell table:style-name="ce61">
              <text:p text:style-name="P998"><text:span text:style-name="T1681">영적 상태와 본질적 의미</text:span><text:span/></text:p>
            </table:table-cell>
          </table:table-row>
        </table:table-header-rows>
        <table:table-row table:style-name="ro22" table:default-cell-style-name="ce59">
          <table:table-cell table:style-name="ce62">
            <text:p text:style-name="P999"><text:span text:style-name="T1682">죽음의 정광명</text:span><text:span/></text:p>
          </table:table-cell>
          <table:table-cell table:style-name="ce63">
            <text:p text:style-name="P1000"><text:span text:style-name="T1683">수많은 세상의 분별이 소멸하고 남은 가장 순수하고 투명한 의식의 빛</text:span><text:span/></text:p>
          </table:table-cell>
        </table:table-row>
        <table:table-row table:style-name="ro23" table:default-cell-style-name="ce59">
          <table:table-cell table:style-name="ce64">
            <text:p text:style-name="P1001"><text:span text:style-name="T1684">일체공의 실현</text:span><text:span/></text:p>
          </table:table-cell>
          <table:table-cell table:style-name="ce65">
            <text:p text:style-name="P1002"><text:span text:style-name="T1685">모든 주관적 집착과 객관적 대상이 완전히 사라진 절대적인 비움의 상태</text:span><text:span/></text:p>
          </table:table-cell>
        </table:table-row>
        <table:table-row table:style-name="ro24" table:default-cell-style-name="ce59">
          <table:table-cell table:style-name="ce66">
            <text:p text:style-name="P1003"><text:span text:style-name="T1686">진정한 죽음</text:span><text:span/></text:p>
          </table:table-cell>
          <table:table-cell table:style-name="ce67">
            <text:p text:style-name="P1004"><text:span text:style-name="T1687">신체적 정지를 넘어 영식의 거친 파도가 모두 멈춘 궁극의 전환점</text:span><text:span/></text:p>
          </table:table-cell>
        </table:table-row>
      </table:table>
      <text:p text:style-name="P1005"><text:span text:style-name="T1688">영화가 끝난 뒤 스크린에 아무런 영상도 나오지 않고 오직 영사기의 순수한 백색 광명만이 극장 안을 가득 채우는 것처럼, 존재는 가장 완전하고 투명한 우주적 휴식에 도달하게 되는 거지.</text:span><text:span/></text:p>
      <text:p text:style-name="P1006"><text:span text:style-name="T1689">📝 핵심 요약</text:span><text:span/></text:p>
      <text:list text:style-name="WWNum65" text:continue-numbering="true">
        <text:list-item>
          <text:p text:style-name="P1007"><text:span text:style-name="T1690">하얀 보리심과 붉은 보리심이 심장 중심의 불괴명점 속으로 녹아들며 에너지가 통합됨.</text:span><text:span/></text:p>
        </text:list-item>
        <text:list-item>
          <text:p text:style-name="P1008"><text:span text:style-name="T1691">중맥의 모든 생명 바람이 극도로 미세한 지명풍으로 흡수되어 거친 호흡이 종결됨.</text:span><text:span/></text:p>
        </text:list-item>
        <text:list-item>
          <text:p text:style-name="P1009"><text:span text:style-name="T1692">평소 잡념에 가려져 있던 본래의 가장 미세한 풍심이 온전하게 밖으로 드러남.</text:span><text:span/></text:p>
        </text:list-item>
        <text:list-item>
          <text:p text:style-name="P1010"><text:span text:style-name="T1693">외적인 하늘이 아닌 내면의 순수한 정광명과 일체공을 마주하며 진정한 죽음에 이름.</text:span><text:span/></text:p>
        </text:list-item>
      </text:list>
      <text:p text:style-name="P1011"><text:span><text:soft-page-break/></text:span><text:span/><text:span/></text:p>
      <text:p text:style-name="P1012"><text:span text:style-name="T1694">[🟢 Online Mode | 26.06.01_14:00:21]</text:span><text:span/></text:p>
      <text:p text:style-name="P1013"><text:span text:style-name="T1695">56. 우리 내면에 숨겨진 근원적 부처의 세 가지 몸</text:span><text:span/></text:p>
      <text:p text:style-name="P1014"><text:span text:style-name="T1696">🔑 핵심 키워드: 기본 법신, 기본 자성신, 기본 지혜법신, 근원적 의식, 깨달음의 설계도</text:span><text:span/></text:p>
      <text:p text:style-name="P1015"><text:span text:style-name="T1697">👑 존재의 가장 깊은 뿌리, 기본 법신</text:span><text:span/></text:p>
      <text:p text:style-name="P1016"><text:span text:style-name="T1698">우리가 죽음의 가장 깊은 단계에 도달하거나 완전한 명상 상태에 들어갈 때, 마음은 마침내 본초부터 존재하던 가장 순수한 근원의 상태를 마주하게 돼. 이를 불교에서는 기본의 법신이라고 부르지. 이것은 스마트폰으로 치면 배경에 켜져 있던 모든 앱을 전부 종료하고 배터리 소모조차 없는 absolute 최하단의 기본 운영체제만 남은 상태와 같아. 세상의 모든 분별과 오염이 사라진, 우리 존재의 진짜 본질이자 고향인 셈이야.</text:span><text:span/></text:p>
      <text:p text:style-name="P1017"><text:span text:style-name="T1699">🌌 비어 있음 속의 순수한 고요, 기본 자성신</text:span><text:span/></text:p>
      <text:p text:style-name="P1018"><text:span text:style-name="T1700">이 근원의 상태가 지닌 텅 비고 고요한 성품 자체를 가리켜 기본의 자성신이라고 해. 아무것도 채워져 있지 않지만, 그렇다고 단순히 캄캄한 암흑이나 허무를 뜻하는 것은 아니야. 구름 한 점 없이 끝없이 펼쳐진 맑은 가을하늘이나, 어떤 그림이든 그려질 수 있도록 완벽하게 비어 있는 거대한 흰색 캔버스를 상상하면 이해하기 쉬워. 무한한 가능성을 품고 있는 거대하고 평화로운 비어 있음의 공간이지.</text:span><text:span/></text:p>
      <text:p text:style-name="P1019"><text:span text:style-name="T1701">👁️ 그 고요함을 비추는 등불, 기본 지혜법신</text:span><text:span/></text:p>
      <text:p text:style-name="P1020"><text:span text:style-name="T1702">놀라운 점은 이 텅 빈 상태를 그냥 내버려 두는 게 아니라, 그 공간이 비어 있음을 스스로 완벽하게 알아차리는 맑은 의식이 함께 깨어난다는 거야. 이를 기본의 지혜법신이라고 불러. 거울이 앞에 놓인 텅 빈 방을 아무런 노력 없이도 있는 그대로 비추어내는 것처럼, 마음이 자신의 순수한 상태를 그대로 거울처럼 목격하는 지혜이지. 어둠 속에서 스스로를 밝히는 인공지능 센서처럼 아주 정밀하고 명석하게 깨어 있는 마음의 눈이야.</text:span><text:span/></text:p>
      <text:p text:style-name="P1021"><text:span text:style-name="T1703">💎 내면에 이미 완성되어 있는 깨달음의 블루프린트</text:span><text:span/></text:p>
      <text:p text:style-name="P1022"><text:span text:style-name="T1704">결국 이 세 가지 상태는 우리가 밖에서 새로 만들어내거나 억지로 쟁취해야 하는 거창한 목표가 아니야. 거대한 바오밥나무의 설계도가 아주 작은 씨앗 안에 이미 완벽하게 들어있는 것처럼, 우리 마음의 가장 깊은 바닥에 이미 처음부터 갖추어져 있던 깨달음의 청사진이지. 거친 육체적 감각과 생각의 소음들이 모두 은멸하는 순간, 우리 안에 숨어있던 가장 고귀한 부처의 세 가지 모습이 자연스럽게 겉으로 드러나는 것뿐이야.</text:span><text:span/></text:p>
      <text:p text:style-name="P1023"><text:span text:style-name="T1705">📝 핵심 요약</text:span><text:span/></text:p>
      <text:list text:style-name="WWNum66" text:continue-numbering="true">
        <text:list-item>
          <text:p text:style-name="P1024"><text:span text:style-name="T1706">의식의 가장 깊은 바닥에는 본초부터 존재하는 근원적인 기본 법신이 자리 잡고 있다.</text:span><text:span/></text:p>
        </text:list-item>
        <text:list-item>
          <text:p text:style-name="P1025"><text:span text:style-name="T1707">법신의 비고 고요한 성품과 공간 그 자체를 기본 자성신이라고 부른다.</text:span><text:span/></text:p>
        </text:list-item>
        <text:list-item>
          <text:p text:style-name="P1026"><text:span text:style-name="T1708">그 텅 빈 상태를 그대로 알아차리는 맑고 명석한 지혜의 마음을 기본 지혜법신이라고 한다.</text:span><text:span/></text:p>
        </text:list-item>
        <text:list-item>
          <text:p text:style-name="P1027"><text:span text:style-name="T1709">이 세 가지 몸은 외부에서 얻는 것이 아니라 인간의 내면에 이미 완성되어 있는 원래의 성품이다.</text:span><text:span/></text:p>
        </text:list-item>
      </text:list>
      <text:p text:style-name="P1028"><text:span><text:soft-page-break/></text:span><text:span/><text:span/></text:p>
      <text:p text:style-name="P1029"><text:span text:style-name="T1710">57. 죽음의 정광명과 에너지의 마지막 분리</text:span><text:span/></text:p>
      <text:p text:style-name="P1030"><text:span text:style-name="T1711">🔑 핵심 키워드: 죽음의 정광명, 하얀 보리심, 붉은 보리심, 기력 고갈</text:span><text:span/></text:p>
      <text:p text:style-name="P1031"><text:span text:style-name="T1712">⏳ 정광명 속에 머무는 대략의 시간</text:span><text:span/></text:p>
      <text:p text:style-name="P1032"><text:span text:style-name="T1713">숨이 완전히 멎은 뒤 찾아오는 원초의 빛, 즉 죽음의 정광명 상태에 보통 사람들은 대략 3일 동안 머물게 돼. 이것은 스마트폰의 전원을 완전히 껐을 때 액정 화면은 즉시 깜깜해지지만 내부 메인보드에 남아 있던 미세한 전류가 완전히 방전되기까지 몇 시간 동안 잔여 에너지가 대기 상태로 유지되는 것과 같은 원리야. 비록 겉보기에는 신체 활동이 멈춘 시신처럼 보일지라도, 내면의 가장 깊은 순수 의식은 이 고요한 빛의 터널 속에 며칠간 안전하게 보호받으며 머무르</text:span><text:span text:style-name="T1714">는 거지.</text:span><text:span/></text:p>
      <text:p text:style-name="P1033"><text:span text:style-name="T1715">💧 신체를 떠나는 두 보리심의 마지막 신호</text:span><text:span/></text:p>
      <text:p text:style-name="P1034"><text:span text:style-name="T1716">이 사흘의 시간이 지나면 심장에 모여 있던 하얀 보리심과 붉은 보리심의 정수가 마침내 신체 밖으로 흘러나오는 신비로운 현상이 나타나. 이는 마치 아주 귀한 보물을 가득 담고 있던 밀폐 용기의 압력이 완전히 풀리면서, 용기 틈새로 내부의 순수한 엑기스가 살포시 새어나오는 장면과 같아. 코나 성기를 통해 미세하게 배출되는 이 에너지의 흔적들은 우리 몸을 지탱하던 근원적인 음과 양의 기운이 마침내 임무를 완수하고 물질 세계를 완전히 떠났음을 보여주는 명확한 도</text:span><text:span text:style-name="T1717">장이야.</text:span><text:span/></text:p>
      <text:p text:style-name="P1035"><text:span text:style-name="T1718">🍂 질병이라는 복병과 에너지의 고갈 변수</text:span><text:span/></text:p>
      <text:p text:style-name="P1036"><text:span text:style-name="T1719">하지만 오랫동안 몹쓸 질병을 앓아서 온몸의 기력이 완전히 말라버린 사람에게는 이 공식이 다르게 적용되기도 해. 오랫동안 충전하지 않아 배터리 자체가 완전히 부식되고 방전된 기기는 전원을 껐을 때 잔여 전류가 전혀 남아 있지 않은 것과 똑같은 이치지. 에너지를 공급할 육체적 바탕이 이미 완전히 소멸해 버렸기 때문에, 며칠이 지나더라도 하얀 보리심과 붉은 보리심이 밖으로 흘러나오는 마지막 신호가 관찰되지 않고 정광명에 머무는 시간도 하루조차 되지 않을 만큼 </text:span><text:span text:style-name="T1720">아주 짧아질 수 있어.</text:span><text:span/></text:p>
      <text:p text:style-name="P1037"><text:span text:style-name="T1721">🚪 의식의 완전한 이탈과 새로운 시작</text:span><text:span/></text:p>
      <text:p text:style-name="P1038"><text:span text:style-name="T1722">이처럼 기력의 상태에 따라 머무는 시간은 다르지만, 두 가지 에너지가 완전히 분리되어 나오는 순간 비로소 의식은 육신이라는 완벽한 집을 떠나게 돼. 옷이 완전히 낡아 더 이상 입을 수 없게 되면 미련 없이 벗어던지고 새 옷을 갈아입으러 나서는 나그네처럼 말이야. 이 마지막 분리의 징후를 명확하게 이해하는 것은 우리가 죽음이라는 거대한 전환점을 두려움이 아닌 새로운 영적 도약의 기회로 바라보게 만드는 소중한 나침반이 되어 줄 거야.</text:span><text:span/></text:p>
      <text:p text:style-name="P1039"><text:span text:style-name="T1723">📝 핵심 요약</text:span><text:span/></text:p>
      <text:list text:style-name="WWNum67" text:continue-numbering="true">
        <text:list-item>
          <text:p text:style-name="P1040"><text:span text:style-name="T1724">보통의 인간은 숨이 멎은 후 원초의 빛인 죽음의 정광명 상태에 대략 3일 동안 머무른다.</text:span><text:span/></text:p>
        </text:list-item>
        <text:list-item>
          <text:p text:style-name="P1041"><text:span text:style-name="T1725">정광명 상태가 끝나면 심장에 융합되었던 하얀 보리심과 붉은 보리심의 정수가 몸 밖으로 흘러나온다.</text:span><text:span/></text:p>
        </text:list-item>
        <text:list-item>
          <text:p text:style-name="P1042"><text:span text:style-name="T1726">심한 질병으로 기력이 고갈된 사람은 에너지 원천이 부족하여 이러한 보리심 유출 징후가 나타나지 않을 수 있다.</text:span><text:span/></text:p>
        </text:list-item>
        <text:list-item>
          <text:p text:style-name="P1043"><text:span text:style-name="T1727">기력이 극도로 쇠한 사람은 정광명에 머무는 기간이 하루 미만으로 단축되기도 한다.</text:span><text:span/></text:p>
        </text:list-item>
      </text:list>
      <text:p text:style-name="P1044"><text:span><text:soft-page-break/></text:span><text:span/><text:span/></text:p>
      <text:p text:style-name="P1045"><text:span text:style-name="T1728">[🟢 Online Mode | 26.06.01_14:00:38]</text:span><text:span/></text:p>
      <text:p text:style-name="P1046"><text:span text:style-name="T1729">58. 정광명과 법신의 화합을 통한 삼매의 자유로움</text:span><text:span/></text:p>
      <text:p text:style-name="P1047"><text:span text:style-name="T1730">🔑 핵심 키워드: 유가행자의 역량, 정광명과 법신의 화합, 삼매의 지속, 명상 기간의 자율성</text:span><text:span/></text:p>
      <text:p text:style-name="P1048"><text:span text:style-name="T1731">🧘 깨달음의 내공에 따른 개인별 역량의 차이</text:span><text:span/></text:p>
      <text:p text:style-name="P1049"><text:span text:style-name="T1732">수행자마다 내면에 쌓아 올린 깨달음의 깊이와 영적 체력은 저마다 달라. 이것은 마치 바다 깊은 곳을 탐험하는 전문 다이버들의 폐활량이나 잠수 장비의 성능 차이와 아주 비슷하지. 내공이 깊고 훈련이 잘된 수행자일수록 거친 의식이 끊어진 상태에서도 당황하지 않고 더 깊은 내면의 영역에서 오랫동안 안정적으로 중심을 잡을 수 있어.</text:span><text:span/></text:p>
      <text:p text:style-name="P1050"><text:span text:style-name="T1733">🤝 근본의 빛과 진리의 완벽한 도킹</text:span><text:span/></text:p>
      <text:p text:style-name="P1051"><text:span text:style-name="T1734">유가행자는 죽음의 순간에 나타나는 우주의 근본 빛인 정광명을 자신이 평소 닦아온 궁극의 진리인 법신과 완전하게 하나로 결합시켜. 우주선이 우주 정거장에 한 치의 오차도 없이 안전하게 도킹하여 하나의 거대한 시스템으로 움직이는 경이로운 현상을 떠올려봐. 내면의 미세한 의식과 우주의 대진리가 이처럼 완벽하게 합일될 때 비로소 진정한 영적 해탈의 문이 열리게 되는 거지.</text:span><text:span/></text:p>
      <text:p text:style-name="P1052"><text:span text:style-name="T1735">⏳ 시간의 흐름을 초월하여 머무는 삼매</text:span><text:span/></text:p>
      <text:p text:style-name="P1053"><text:span text:style-name="T1736">이 두 가지 에너지를 화합시킨 수행자는 고도의 집중 상태인 삼매 속으로 깊이 침잠하게 돼. 우리가 인생 최고의 명작 영화에 완벽하게 몰입했을 때 몇 시간이 단 몇 분처럼 순식간에 지나가는 신비로운 경험을 하잖아. 삼매에 든 수행자의 의식도 이와 같아서, 시간과 공간의 물리적인 제약을 완전히 초월한 채 온전한 평온과 깨달음의 기쁨 속에 머물게 되는 거야.</text:span><text:span/></text:p>
      <text:p text:style-name="P1054"><text:span text:style-name="T1737">🗓️ 배터리 용량에 따라 달라지는 삼매의 기간</text:span><text:span/></text:p>
      <text:p text:style-name="P1055"><text:span text:style-name="T1738">이렇게 깊은 명상 상태에 머무는 기간은 며칠이 될지 몇 주가 될지 정해진 고정 기한이 없고 온전히 개인의 역량에 달려 있어. 고성능 대용량 배터리를 장착한 전자기기가 한 번의 충전으로 아주 오랜 시간 동안 작동할 수 있는 것과 같은 원리야. 수행자의 영적 배터리가 단단하고 거대할수록 삼매의 유효 기간은 늘어나며, 그 고요한 상태를 스스로 자율적으로 조율할 수 있게 되지.</text:span><text:span/></text:p>
      <text:p text:style-name="P1056"><text:span text:style-name="T1739">📝 핵심 요약</text:span><text:span/></text:p>
      <text:list text:style-name="WWNum68" text:continue-numbering="true">
        <text:list-item>
          <text:p text:style-name="P1057"><text:span text:style-name="T1740">수행자 개인의 깨달음의 깊이에 따라 명상 상태를 유지하는 영적 체력에 차이가 남.</text:span><text:span/></text:p>
        </text:list-item>
        <text:list-item>
          <text:p text:style-name="P1058"><text:span text:style-name="T1741">죽음의 순간 마주하는 정광명을 우주의 진리인 법신과 완벽하게 화합시킴.</text:span><text:span/></text:p>
        </text:list-item>
        <text:list-item>
          <text:p text:style-name="P1059"><text:span text:style-name="T1742">두 에너지가 합일되면 시공간을 초월한 깊은 삼매의 상태에 안정적으로 진입함.</text:span><text:span/></text:p>
        </text:list-item>
        <text:list-item>
          <text:p text:style-name="P1060"><text:span text:style-name="T1743">삼매에 머무는 기간은 고정되어 있지 않으며 수행자의 역량에 따라 자율적으로 결정됨.</text:span><text:span/></text:p>
        </text:list-item>
      </text:list>
      <text:p text:style-name="P1061"><text:span><text:soft-page-break/></text:span><text:span/><text:span/></text:p>
      <text:p text:style-name="P1062"><text:span text:style-name="T1744">59. 의식 단계의 전환과 정교한 은멸의 법칙</text:span><text:span/></text:p>
      <text:p text:style-name="P1063"><text:span text:style-name="T1745">🔑 핵심 키워드: 은멸의 원리, 현명·증휘·근득, 정광명, 의식 전환</text:span><text:span/></text:p>
      <text:p text:style-name="P1064"><text:span text:style-name="T1746">🎭 무대 위의 전등이 차례로 꺼지는 과정</text:span><text:span/></text:p>
      <text:p text:style-name="P1065"><text:span text:style-name="T1747">의식이 현명, 증휘, 근득을 거쳐 최종적인 정광명의 마음으로 나아갈 때, 우리는 이것을 에너지가 차례로 녹아든다고 표현해. 하지만 이것은 앞의 마음이 뒤의 마음에 흡수되어 성질이 변하는 게 아니야. 연극 무대에서 첫 번째 주인공을 비추던 밝은 조명이 서서히 어두워지면, 비로소 그동안 보이지 않던 더 은은하고 깊은 두 번째 조명이 무대 뒤에서 서서히 드러나는 것과 같은 이치지.</text:span><text:span/></text:p>
      <text:p text:style-name="P1066"><text:span text:style-name="T1748">💡 앞선 에너지의 소멸과 새로운 마음의 부상</text:span><text:span/></text:p>
      <text:p text:style-name="P1067"><text:span text:style-name="T1749">정확히 말하자면, 앞 단계 마음이 가졌던 거친 활동력과 기능이 완전히 정지하면서 다음 단계의 미세한 마음이 지닌 빛이 자연스럽게 눈앞에 뚜렷해지는 현상이야. 스마트폰에서 실행 중이던 무거운 앱을 완전히 종료하면, 백그라운드에서 조용히 돌아가던 핵심 시스템의 화면이 명확하게 전면에 나타나는 제어 과정과 매우 닮아 있어. 앞의 에너지가 완전히 멈춰 주어야만 그 뒤에 숨어 있던 더 깊은 의식이 깨어날 수 있는 거지.</text:span><text:span/></text:p>
      <text:p text:style-name="P1068"><text:span text:style-name="T1750">🚫 본질의 변형이 아닌 깨끗한 주도권 교체</text:span><text:span/></text:p>
      <text:p text:style-name="P1069"><text:span text:style-name="T1751">밀교에서는 이 부분을 아주 중요하게 다루는데, 앞의 마음이 뒤의 마음의 성품으로 탈바꿈하는 것이 결코 아니라는 점이야. 낮이 밤으로 바뀔 때 낮이라는 시간 자체가 물리적으로 변해서 밤이 되는 게 아니라, 햇빛이 사라지면서 원래 그 자리에 있던 밤의 어둠이 드러나는 것처럼 주도권의 완벽한 교체일 뿐이야. 의식의 본질 자체가 왜곡되거나 바뀌는 것이 아니라, 겉을 감싸던 거친 껍질이 한 꺼풀씩 벗겨지는 순수한 과정이라는 뜻이지.</text:span><text:span/></text:p>
      <text:p text:style-name="P1070"><text:span text:style-name="T1752">🌅 궁극의 정광명을 마주하기 위한 내면의 준비</text:span><text:span/></text:p>
      <text:p text:style-name="P1071"><text:span text:style-name="T1753">이렇게 거친 마음들이 순서대로 자신의 힘을 내려놓고 사라져 갈 때, 우리 내면 깊은 곳에 숨겨져 있던 원초의 빛인 정광명이 마침내 온전하게 부상하게 돼. 이 정교한 은멸의 법칙을 이해하고 있으면 죽음의 순간에 찾아오는 의식의 변화를 두려워하지 않고 오히려 지혜롭게 받아들일 수 있어. 복잡하게 얽혀 있던 생각의 실타래가 하나씩 풀려나가며 마침내 가장 청정하고 순수한 내면의 지혜와 마주하게 되는 대단원인 셈이지.</text:span><text:span/></text:p>
      <text:p text:style-name="P1072"><text:span text:style-name="T1754">📝 핵심 요약</text:span><text:span/></text:p>
      <text:list text:style-name="WWNum69" text:continue-numbering="true">
        <text:list-item>
          <text:p text:style-name="P1073"><text:span text:style-name="T1755">현명, 증휘, 근득, 정광명이 은멸하는 과정은 성품의 변형이 아님</text:span><text:span/></text:p>
        </text:list-item>
        <text:list-item>
          <text:p text:style-name="P1074"><text:span text:style-name="T1756">앞 단계 마음의 활동력이 멈춤으로써 뒤 단계 마음의 힘이 뚜렷해지는 현상임</text:span><text:span/></text:p>
        </text:list-item>
        <text:list-item>
          <text:p text:style-name="P1075"><text:span text:style-name="T1757">무대의 조명이 바뀌듯 의식의 주도권이 거친 상태에서 미세한 상태로 교체됨</text:span><text:span/></text:p>
        </text:list-item>
        <text:list-item>
          <text:p text:style-name="P1076"><text:span text:style-name="T1758">이 정교한 에너지 전환을 통해 내면의 원초적인 빛인 정광명을 마주하게 됨</text:span><text:span/></text:p>
        </text:list-item>
      </text:list>
      <text:p text:style-name="P1077"><text:span><text:soft-page-break/></text:span><text:span/><text:span/></text:p>
      <text:p text:style-name="P1078"><text:span text:style-name="T1759">60. 가을하늘의 비유와 사공의 고요한 경계</text:span><text:span/></text:p>
      <text:p text:style-name="P1079"><text:span text:style-name="T1760">🔑 핵심 키워드: 가을하늘 비유, 사공, 거친 분별 소멸, 텅 빈 고요함, 내적 경계</text:span><text:span/></text:p>
      <text:p text:style-name="P1080"><text:span text:style-name="T1761">🍁 먼지와 구름이 걷힌 청명한 가을하늘</text:span><text:span/></text:p>
      <text:p text:style-name="P1081"><text:span text:style-name="T1762">수행의 깊은 단계에서 나타나는 마음의 상태를 왜 하필 청명한 가을하늘에 비유했을까? 가을하늘은 여름내 내린 비 덕분에 땅에서 피어오르던 미세한 먼지들이 말끔히 씻겨 내려간 상태야. 게다가 하늘을 하얗게 가리고 있던 두꺼운 구름마저 완전히 걷혀서 그 어떤 계절보다 투명하고 맑지. 이것은 세차게 소나기가 쏟아진 뒤 황사나 미세먼지가 흔적도 없이 사라져서 저 멀리 있는 산줄기까지 선명하게 보이는 아주 깨끗한 날을 떠올리면 이해하기 쉬워.</text:span><text:span/></text:p>
      <text:p text:style-name="P1082"><text:span text:style-name="T1763">🧼 거친 장애가 사라진 텅 빈 고요함</text:span><text:span/></text:p>
      <text:p text:style-name="P1083"><text:span text:style-name="T1764">가을하늘이 아름답고 명징한 진짜 이유는 무언가 특별한 것이 가득 차 있어서가 아니라, 오히려 시야를 방해하는 거치장스러운 것들이 모두 사라져 텅 비어 있기 때문이야. 하늘을 가로막는 높은 빌딩이나 앞을 가리는 짙은 안개가 없는 탁 트인 공간의 해방감과 같지. 우리 마음도 이처럼 내면을 복잡하게 만들던 거친 장애물들이 하나둘 제거되면, 마치 끝없이 넓은 가을하늘처럼 깊고 고요한 상태를 맞이하게 된단다.</text:span><text:span/></text:p>
      <text:p text:style-name="P1084"><text:span text:style-name="T1765">🤫 사공의 단계와 거친 분별의 소멸</text:span><text:span/></text:p>
      <text:p text:style-name="P1085"><text:span text:style-name="T1766">공성의 아주 깊은 영역을 보여주는 사공의 단계에 접어들면, 우리 의식 위에서 끊임없이 소란을 피우던 거친 분별과 잡념들이 깨끗하게 소멸해. 조금 어렵게 느껴질 수 있지만, 이런 깊은 마음의 작동 원리를 알아갈 때 우리 의식의 지평도 한 단계 더 넓어지게 되지. 마치 하루 종일 시끄럽게 돌아가던 공장의 거대한 기계들이 일제히 가동을 멈추고 찾아오는 깊은 침묵과도 같아. 이 단계에서 마음은 온갖 시시비비와 고정관념을 내려놓고, 그동안 경험해보지 못한 극치의 </text:span><text:span text:style-name="T1767">투명함을 직접 마주하게 돼.</text:span><text:span/></text:p>
      <text:p text:style-name="P1086"><text:span text:style-name="T1768">👁️ 외부의 풍경이 아닌 마음의 눈으로 보는 경계</text:span><text:span/></text:p>
      <text:p text:style-name="P1087"><text:span text:style-name="T1769">여기서 우리가 꼭 기억해야 할 중요한 점이 있어. 가을하늘 같다고 해서 임종이나 깊은 명상 중에 실제로 눈앞에 파란 하늘이나 구름 없는 물리적인 광경이 가상현실처럼 펼쳐지는 건 아니야. 이것은 외부의 감각으로 보는 풍경이 아니라, 거친 생각이 완전히 가라앉았을 때 의식 자체가 느끼는 순수한 내적 상태를 설명하기 위한 비유일 뿐이지. 눈을 감고 깊은 평화에 잠겼을 때 온몸으로 느껴지는 고요한 공간감처럼, 오직 마음의 눈으로만 경험할 수 있는 깨달음의 세계란</text:span><text:span text:style-name="T1770">다.</text:span><text:span/></text:p>
      <text:p text:style-name="P1088"><text:span text:style-name="T1771">📝 핵심 요약</text:span><text:span/></text:p>
      <text:list text:style-name="WWNum70" text:continue-numbering="true">
        <text:list-item>
          <text:p text:style-name="P1089"><text:span text:style-name="T1772">청명한 가을하늘 비유는 먼지와 구름이라는 두 가지 장애가 완전히 사라진 맑은 상태를 뜻한다.</text:span><text:span/></text:p>
        </text:list-item>
        <text:list-item>
          <text:p text:style-name="P1090"><text:span text:style-name="T1773">사공의 경계는 마음속의 거친 분별과 잡념이 소멸하여 가을하늘처럼 텅 빈 상태가 되는 것이다.</text:span><text:span/></text:p>
        </text:list-item>
        <text:list-item>
          <text:p text:style-name="P1091"><text:span text:style-name="T1774">이 비유는 장애물이 사라진 고요함이라는 모양새와 성격이 서로 닮았기 때문에 사용되었다.</text:span><text:span/></text:p>
        </text:list-item>
        <text:list-item>
          <text:p text:style-name="P1092"><text:span text:style-name="T1775">실제로 수행 중에 눈앞에 가을하늘과 같은 물리적인 풍경이 시각적으로 일어나는 것은 아니다.</text:span><text:span/></text:p>
        </text:list-item>
      </text:list>
      <text:p text:style-name="P1093"><text:span><text:soft-page-break/></text:span><text:span/><text:span/></text:p>
      <text:p text:style-name="P1094"><text:span text:style-name="T1776">[🟢 Online Mode | 26.06.01_14:03:02]</text:span><text:span/></text:p>
      <text:p text:style-name="P1095"><text:span text:style-name="T1777">61. 거친 바람 뒤에 숨겨진 미세한 생명의 바람</text:span><text:span/></text:p>
      <text:p text:style-name="P1096"><text:span text:style-name="T1778">🔑 핵심 키워드: 분별의 마음, 생명의 바람, 거친 바람과 미세한 바람, 의식의 운반체</text:span><text:span/></text:p>
      <text:p text:style-name="P1097"><text:span text:style-name="T1779">❓ 모든 에너지가 끝났다는 착각</text:span><text:span/></text:p>
      <text:p text:style-name="P1098"><text:span text:style-name="T1780">80가지나 되는 복잡한 분별의 마음과 그걸 태우고 다니던 거친 생명의 바람이 한바탕 사라지고 나면, 다음 단계에서는 더 이상 소멸할 바람이 남아있지 않을 거라고 생각하기 쉬워. 큰 폭풍우가 한 번 몰아치고 지나가면 하늘이 완전히 고요해질 거라고 믿는 것과 같지. 하지만 의식의 깊은 바다로 들어가는 여정은 그렇게 단순하게 한 번에 끝나지 않아.</text:span><text:span/></text:p>
      <text:p text:style-name="P1099"><text:span text:style-name="T1781">🧅 양파 껍질처럼 겹겹이 쌓인 에너지</text:span><text:span/></text:p>
      <text:p text:style-name="P1100"><text:span text:style-name="T1782">우리 몸을 흐르는 생명의 바람은 거친 종류와 미세한 종류가 양파 껍질처럼 겹겹이 쌓여 세분화되어 있어. 비유하자면 대형 여객선이 항구에 정박할 때 거대한 메인 엔진을 껐다고 해서 배의 모든 전력이 다 나간 게 아닌 것과 같지. 커다란 엔진 소리는 멈췄어도 배 안의 조명과 필수 시스템을 돌리기 위한 미세한 보조 발전기는 여전히 조용히 돌아가고 있는 셈이야.</text:span><text:span/></text:p>
      <text:p text:style-name="P1101"><text:span text:style-name="T1783">🌬️ 단계마다 깨어나는 미세한 운반체들</text:span><text:span/></text:p>
      <text:p text:style-name="P1102"><text:span text:style-name="T1784">현명, 증휘, 근득으로 이어지는 깊은 명상의 단계마다 그 수준에 걸맞은 미세한 생명의 바람들이 여전히 활동하며 의식을 받쳐주고 있어. 거친 바람들이 먼저 숨을 죽여야만 비로소 그 뒤에 숨어 있던 아주 가늘고 정밀한 에너지의 흐름들이 모습을 드러내는 거지. 이 미세한 바람들이 다음 단계들을 거치며 순차적으로 완전히 녹아내려야만 마음은 비로소 완전한 멈춤을 향해 나아갈 수 있어.</text:span><text:span/></text:p>
      <text:p text:style-name="P1103"><text:span text:style-name="T1785">🧭 더 깊은 의식의 심해로 내려가는 열쇠</text:span><text:span/></text:p>
      <text:p text:style-name="P1104"><text:span text:style-name="T1786">결국 거친 바람이 소멸했다고 해서 에너지가 완전히 고갈된 것이 아니라, 오히려 진짜 순수한 정신적 영역으로 들어가기 위한 준비가 끝난 거야. 우주선이 지구 중력권을 벗어날 때 거대한 1단 로켓을 분리하고 나면, 훨씬 작지만 정밀한 2단, 3단 추진체로 우주를 비행하는 것과 똑같아. 이 미세한 바람들의 존재를 이해하는 것이야말로 죽음의 과정을 깨달음으로 바꾸는 핵심 열쇠가 되지.</text:span><text:span/></text:p>
      <text:p text:style-name="P1105"><text:span text:style-name="T1787">📝 핵심 요약</text:span><text:span/></text:p>
      <text:list text:style-name="WWNum71" text:continue-numbering="true">
        <text:list-item>
          <text:p text:style-name="P1106"><text:span text:style-name="T1788">80자성의 분별심과 거친 생명의 바람이 사라져도 소멸할 에너지는 여전히 남아 있어.</text:span><text:span/></text:p>
        </text:list-item>
        <text:list-item>
          <text:p text:style-name="P1107"><text:span text:style-name="T1789">생명의 바람은 거친 것과 미세한 것으로 나뉘며, 거친 바람이 먼저 은멸하는 것뿐이야.</text:span><text:span/></text:p>
        </text:list-item>
        <text:list-item>
          <text:p text:style-name="P1108"><text:span text:style-name="T1790">대형 선박의 메인 엔진을 꺼도 보조 발전기가 돌듯 미세한 바람들이 의식을 운반해.</text:span><text:span/></text:p>
        </text:list-item>
        <text:list-item>
          <text:p text:style-name="P1109"><text:span text:style-name="T1791">현명, 증휘, 근득의 다음 단계들을 거치며 이 미세한 바람들까지 완전히 소멸하게 돼.</text:span><text:span/></text:p>
        </text:list-item>
      </text:list>
      <text:p text:style-name="P1110"><text:span><text:soft-page-break/></text:span><text:span/><text:span/></text:p>
      <text:p text:style-name="P1111"><text:span text:style-name="T1792">62. 미세한 바람의 단독 비행과 정광명으로의 여정</text:span><text:span/></text:p>
      <text:p text:style-name="P1112"><text:span text:style-name="T1793">🔑 핵심 키워드: 미세한 생명의 바람, 의식 지탱, 거친 바람의 은멸, 죽음의 정광명</text:span><text:span/></text:p>
      <text:p text:style-name="P1113"><text:span text:style-name="T1794">✈️ 거친 조종사가 물러난 뒤의 단독 비행</text:span><text:span/></text:p>
      <text:p text:style-name="P1114"><text:span text:style-name="T1795">이 단계는 마치 비행기를 함께 조종하던 거친 조종사가 자리를 비우고, 오직 베테랑 수석 조종사인 미세한 생명의 바람 혼자서 키를 잡고 단독 비행을 시작하는 특별한 시간이야. 우리 몸과 마음을 바쁘게 움직이던 거친 호흡과 물리적인 에너지가 밝은 마음 속으로 완전히 녹아들어 사라지면, 그때부터 오직 미세한 에너지만이 우리 의식을 단독으로 지탱하는 아주 순수한 순간이 찾아오게 돼.</text:span><text:span/></text:p>
      <text:p text:style-name="P1115"><text:span text:style-name="T1796">🏁 미세한 의식 비행이 시작되는 출발점</text:span><text:span/></text:p>
      <text:p text:style-name="P1116"><text:span text:style-name="T1797">이 순수한 의식의 여행이 시작되는 정확한 시점은 바로 거친 생명의 바람들이 밝은 마음에 흡수되어 은멸하는 순간이야. 일상생활에 비유하자면, 온갖 소음이 가득하던 대형 발전기가 꺼지고 오직 핵심 시스템만을 돌리는 정밀한 비상 배터리가 켜지는 첫 전환점이라고 할 수 있지. 외부로 향하던 거친 에너지가 완전히 사라져야만 비로소 미세한 바람이 온전히 제 역할을 하며 의식을 지탱할 수 있게 되는 법이야.</text:span><text:span/></text:p>
      <text:p text:style-name="P1117"><text:span text:style-name="T1798">🛑 정광명이라는 종착지를 향한 마지막 은멸</text:span><text:span/></text:p>
      <text:p text:style-name="P1118"><text:span text:style-name="T1799">이렇게 독자적으로 의식을 지탱하던 미세한 바람의 여정은 영원히 지속되는 게 아니라, 정광명에 가까운 마음이 마침내 죽음의 정광명 속으로 완전히 은멸할 때까지 이어져. 어두운 터널의 마지막 구간을 지나 눈부신 빛의 출구로 완전히 빠져나가는 과정과 같지. 가장 깊고 근원적인 마음의 빛인 정광명에 도달하는 그 순간, 미세한 바람 역시 자신의 임무를 다하고 고요히 녹아들게 돼.</text:span><text:span/></text:p>
      <text:p text:style-name="P1119"><text:span text:style-name="T1800">💎 본질적인 깨달음을 얻는 단 하나의 골든타임</text:span><text:span/></text:p>
      <text:p text:style-name="P1120"><text:span text:style-name="T1801">이 짧은 기간은 겉치레와 소음이 모두 사라지고 오직 의식의 핵심 뼈대만 남는 상태이기 때문에, 수행자에게는 깨달음을 얻을 수 있는 최고의 기회이자 골든타임이 돼. 흙탕물이 가라앉아 맑은 물만 남았을 때 바닥에 떨어진 보석을 명확히 볼 수 있는 것처럼, 거친 바람이 멈춘 이 시기야말로 내면의 가장 순수한 본질과 마주할 수 있는 가장 소중한 시간이야.</text:span><text:span/></text:p>
      <text:p text:style-name="P1121"><text:span text:style-name="T1802">📝 핵심 요약</text:span><text:span/></text:p>
      <text:list text:style-name="WWNum72" text:continue-numbering="true">
        <text:list-item>
          <text:p text:style-name="P1122"><text:span text:style-name="T1803">미세한 생명의 바람이 의식을 단독으로 지탱하는 특정한 기간이 존재한다.</text:span><text:span/></text:p>
        </text:list-item>
        <text:list-item>
          <text:p text:style-name="P1123"><text:span text:style-name="T1804">이 과정은 거친 생명의 바람들이 밝은 마음으로 흡수되어 은멸할 때 시작된다.</text:span><text:span/></text:p>
        </text:list-item>
        <text:list-item>
          <text:p text:style-name="P1124"><text:span text:style-name="T1805">정광명에 가까운 마음이 죽음의 정광명으로 완전히 은멸할 때까지 이 기간이 유지된다.</text:span><text:span/></text:p>
        </text:list-item>
        <text:list-item>
          <text:p text:style-name="P1125"><text:span text:style-name="T1806">거친 에너지가 사라지고 미세한 바람만 남는 이 시기는 내면의 본질을 깨닫는 최고의 기회이다.</text:span><text:span/></text:p>
        </text:list-item>
      </text:list>
      <text:p text:style-name="P1126"><text:span><text:soft-page-break/></text:span><text:span/><text:span/></text:p>
      <text:p text:style-name="P1127"><text:span text:style-name="T1807">[🔴 Offline Mode | 26.06.01_14:03:16]</text:span><text:span/></text:p>
      <text:p text:style-name="P1128"><text:span text:style-name="T1808">63. 사공의 단계와 세속 경계의 소멸</text:span><text:span/></text:p>
      <text:p text:style-name="P1129"><text:span text:style-name="T1809">🔑 핵심 키워드: 사공, 미세한 의식, 세속의 경계, 텅 빈 고요함, 공성의 대상</text:span><text:span/></text:p>
      <text:p text:style-name="P1130"><text:span text:style-name="T1810">🌀 사공의 단계와 의식의 점진적 미세화</text:span><text:span/></text:p>
      <text:p text:style-name="P1131"><text:span text:style-name="T1811">공성의 깊이를 점진적으로 체험하는 사공의 단계에 접어들면, 의식은 이전과는 비교할 수 없을 정도로 고도로 정밀하고 섬세해지기 시작해. 단계가 깊어질수록 앞선 마음에 비해 뒤따르는 마음과 대상들이 더욱더 미세하게 변화하는 강력한 내면의 힘이 작동하거든. 이는 마치 현미경의 배율을 계속해서 높여갈 때 눈에 보이던 거친 표면들이 사라지고 마침내 물질의 가장 깊은 원자 단위의 미세한 떨림 속으로 빠져드는 과정과 아주 비슷해. 의식이 겉껍질을 하나씩 벗으며 가장 </text:span><text:span text:style-name="T1812">부드럽고 순수한 알맹이만 남기는 여정이라고 볼 수 있지.</text:span><text:span/></text:p>
      <text:p text:style-name="P1132"><text:span text:style-name="T1813">🌊 거친 세속적 경계의 자연스러운 소멸</text:span><text:span/></text:p>
      <text:p text:style-name="P1133"><text:span text:style-name="T1814">이렇게 의식이 극도로 미세해짐에 따라, 평소 우리 마음을 어지럽히던 거친 세속의 경계와 대상들이 의식의 표면 위에서 완전히 자취를 감추게 돼. 우리가 일상에서 마주하던 소음, 물질적인 형상, 그리고 세상에 대한 복잡한 기억들이 더 이상 마음에 붙어있지 못하고 스르르 녹아내리는 거야. 마치 짙은 안개 속으로 깊이 걸어 들어갈 때 멀리 보이던 거대한 빌딩이나 화려한 간판의 형체들이 서서히 흐려지다가 결국 완벽하게 사라져 버리는 현상과 똑같아. 세상의 소란스러</text:span><text:span text:style-name="T1815">움이 완전히 마감되는 순간이지.</text:span><text:span/></text:p>
      <text:p text:style-name="P1134"><text:span text:style-name="T1816">🌌 의식 위에 떠오르는 텅 빈 고요함</text:span><text:span/></text:p>
      <text:p text:style-name="P1135"><text:span text:style-name="T1817">거친 세속의 관념들이 깨끗하게 씻겨 나간 자리에는 오직 투명하고 텅 빈 고요한 경계만이 잔잔하게 발생하게 된단다. 어떤 방해물도 없는 무한한 공간감과 평온함이 온 의식을 가득 채우는 신비로운 경험을 하게 되는 거야. 이는 밤하늘을 가리고 있던 두꺼운 먹구름과 도시의 인공적인 불빛들이 한꺼번에 사라진 뒤, 마침내 끝없이 펼쳐진 맑고 깊은 밤하늘의 우주 공간을 온전히 마주할 때 느껴지는 거대하고 고요한 평화와 매우 닮아 있어.</text:span><text:span/></text:p>
      <text:p text:style-name="P1136"><text:span text:style-name="T1818">🧘 공성을 대상으로 삼지 않는 순수한 상태</text:span><text:span/></text:p>
      <text:p text:style-name="P1137"><text:span text:style-name="T1819">여기서 한 가지 정말 중요한 점은, 이 상태가 공성이라는 특정한 개념을 마음의 눈으로 억지로 쳐다보거나 대상으로 삼고 있는 것이 아니라는 사실이야. 어떤 대상을 억지로 명상하는 것이 아니라, 거친 분별이 사라짐으로써 자연스럽게 도달한 마음 본연의 맑은 상태일 뿐이지. 방 안의 가구를 모두 밖으로 빼냈을 때 방이 텅 비게 되는 것처럼, 텅 비어 있음이라는 새로운 물건을 방에 들여놓은 게 아니라 가구가 사라진 상태 그 자체를 경험하는 것과 같은 이치란다.</text:span><text:span/></text:p>
      <text:p text:style-name="P1138"><text:span text:style-name="T1820">📝 핵심 요약</text:span><text:span/></text:p>
      <text:list text:style-name="WWNum73" text:continue-numbering="true">
        <text:list-item>
          <text:p text:style-name="P1139"><text:span text:style-name="T1821">사공의 단계에서는 뒤로 갈수록 의식과 그 대상이 이전보다 더욱더 미세하게 변화함.</text:span><text:span/></text:p>
        </text:list-item>
        <text:list-item>
          <text:p text:style-name="P1140"><text:span text:style-name="T1822">의식이 극도로 섬세해지는 힘에 의해 일상의 거친 세속적 경계와 관념들이 완전히 소멸함.</text:span><text:span/></text:p>
        </text:list-item>
        <text:list-item>
          <text:p text:style-name="P1141"><text:span text:style-name="T1823">세속의 경계가 사라진 자리에 무한한 공간감과 투명하고 텅 빈 고요한 경계가 피어남.</text:span><text:span/></text:p>
        </text:list-item>
        <text:list-item>
          <text:p text:style-name="P1142"><text:span text:style-name="T1824">이는 공성을 별도의 객체나 대상으로 인식하는 것이 아니라 분별이 사라진 자연스러운 상태임.</text:span><text:span/></text:p>
        </text:list-item>
      </text:list>
      <text:p text:style-name="P1143"><text:span><text:soft-page-break/></text:span><text:span/><text:span/></text:p>
      <text:p text:style-name="P1144"><text:span text:style-name="T1825">64. 범부의 착각과 실재성의 한계</text:span><text:span/></text:p>
      <text:p text:style-name="P1145"><text:span text:style-name="T1826">🔑 핵심 키워드: 수행의 부재, 실재성 오인, 비실재성 인식, 지각의 장벽</text:span><text:span/></text:p>
      <text:p text:style-name="P1146"><text:span text:style-name="T1827">🛑 수행의 부재와 지각의 고착</text:span><text:span/></text:p>
      <text:p text:style-name="P1147"><text:span text:style-name="T1828">밀교의 깊은 수행인 생기차제와 원만차제를 평소에 닦지 않은 평범한 사람들은 죽음의 과정에서 나타나는 미세한 의식의 변화를 올바르게 알아차리지 못해. 마음을 통제하고 본질을 꿰뚫어 보는 훈련을 전혀 하지 않았기 때문에, 눈앞에 펼쳐지는 의식의 명광이나 징후들에 대책 없이 휩쓸려 버리는 거지. 이는 마치 거친 파도가 치는 바다에 준비 없이 뛰어든 수영 초보자가 파도의 흐름을 활용하지 못하고 물속으로 가라앉는 것과 같단다.</text:span><text:span/></text:p>
      <text:p text:style-name="P1148"><text:span text:style-name="T1829">🕶️ 실재라는 안경을 쓴 착각</text:span><text:span/></text:p>
      <text:p text:style-name="P1149"><text:span text:style-name="T1830">훈련되지 않은 범부들은 죽음의 순간에 마주하는 내적인 환영이나 광명을 만났을 때, 그것을 원래부터 존재하는 절대적인 실체로 고집하며 받아들이게 돼. 가상현실 기기를 처음 착용한 사람이 눈앞에 나타난 가짜 괴물을 진짜 생명체로 착각해서 극심한 공포를 느끼는 상황과 정확히 일치하지. 화면 속의 디지털 픽셀일 뿐이라는 사실을 전혀 인지하지 못하고, 자신이 경험하는 고요함이나 빛을 진짜 외부 세계의 물질처럼 굳게 믿어 버리는 현상이야.</text:span><text:span/></text:p>
      <text:p text:style-name="P1150"><text:span text:style-name="T1831">📊 수행 여부에 따른 인식의 차이</text:span><text:span/></text:p>
      <text:p text:style-name="P1151"><text:span text:style-name="T1832">마음의 본질을 닦은 이와 그렇지 못한 이가 죽음의 징후를 대하는 방식은 완전히 극과 극으로 갈라지게 된단다. 이 차이를 명확하게 이해하면 왜 평소의 마음 훈련이 뇌와 의식의 성장 부근에서 중요한지 알 수 있어.</text:span><text:span/></text:p>
      <table:table table:style-name="ta8">
        <table:table-columns>
          <table:table-column table:style-name="co19"/>
          <table:table-column table:style-name="co20"/>
          <table:table-column table:style-name="co21"/>
        </table:table-columns>
        <table:table-header-rows>
          <table:table-row table:style-name="ro25" table:default-cell-style-name="ce68">
            <table:table-cell table:style-name="ce69">
              <text:p text:style-name="P1152"><text:span text:style-name="T1833">구분</text:span><text:span/></text:p>
            </table:table-cell>
            <table:table-cell table:style-name="ce70">
              <text:p text:style-name="P1153"><text:span text:style-name="T1834">도를 닦지 않은 범부의 인식</text:span><text:span/></text:p>
            </table:table-cell>
            <table:table-cell table:style-name="ce71">
              <text:p text:style-name="P1154"><text:span text:style-name="T1835">도를 닦은 수행자의 인식</text:span><text:span/></text:p>
            </table:table-cell>
          </table:table-row>
        </table:table-header-rows>
        <table:table-row table:style-name="ro26" table:default-cell-style-name="ce68">
          <table:table-cell table:style-name="ce72">
            <text:p text:style-name="P1155"><text:span text:style-name="T1836">현상에 대한 관점</text:span><text:span/></text:p>
          </table:table-cell>
          <table:table-cell table:style-name="ce73">
            <text:p text:style-name="P1156"><text:span text:style-name="T1837">눈앞의 현상을 오로지 실재하는 것으로만 오인함</text:span><text:span/></text:p>
          </table:table-cell>
          <table:table-cell table:style-name="ce74">
            <text:p text:style-name="P1157"><text:span text:style-name="T1838">현상이 비실재이자 마음의 투영임을 알아차림</text:span><text:span/></text:p>
          </table:table-cell>
        </table:table-row>
        <table:table-row table:style-name="ro27" table:default-cell-style-name="ce68">
          <table:table-cell table:style-name="ce75">
            <text:p text:style-name="P1158"><text:span text:style-name="T1839">지각의 상태</text:span><text:span/></text:p>
          </table:table-cell>
          <table:table-cell table:style-name="ce76">
            <text:p text:style-name="P1159"><text:span text:style-name="T1840">내면의 변화에 속아 집착과 두려움에 빠짐</text:span><text:span/></text:p>
          </table:table-cell>
          <table:table-cell table:style-name="ce77">
            <text:p text:style-name="P1160"><text:span text:style-name="T1841">스크린의 영화를 보듯 초연하고 맑게 유지함</text:span><text:span/></text:p>
          </table:table-cell>
        </table:table-row>
        <table:table-row table:style-name="ro28" table:default-cell-style-name="ce68">
          <table:table-cell table:style-name="ce78">
            <text:p text:style-name="P1161"><text:span text:style-name="T1842">최종적인 결과</text:span><text:span/></text:p>
          </table:table-cell>
          <table:table-cell table:style-name="ce79">
            <text:p text:style-name="P1162"><text:span text:style-name="T1843">윤회의 굴레 속으로 다시 휩쓸려 들어감</text:span><text:span/></text:p>
          </table:table-cell>
          <table:table-cell table:style-name="ce80">
            <text:p text:style-name="P1163"><text:span text:style-name="T1844">근원적 명광과 하나가 되어 해탈의 기회를 얻음</text:span><text:span/></text:p>
          </table:table-cell>
        </table:table-row>
      </table:table>
      <text:p text:style-name="P1164"><text:span text:style-name="T1845">🌪️ 비실재를 보지 못하는 인식의 장벽</text:span><text:span/></text:p>
      <text:p text:style-name="P1165"><text:span text:style-name="T1846">결국 마음의 본질이 원래 텅 비어 있고 고정된 실체가 없다는 비실재의 진실을, 범부의 완고한 의식은 결코 스스로 깨닫지 못해. 두꺼운 얼음벽에 갇힌 것처럼, 현상의 이면에 숨겨진 환상 같은 속성을 알아차리는 인식이 일어날 공간이 내면에 전혀 없는 거지. 눈앞에 낀 안개가 너무 짙어서 그 너머에 광활하고 텅 빈 하늘이 존재한다는 사실을 상상조차 하지 못하는 폐쇄된 상태라고 보면 돼.</text:span><text:span/></text:p>
      <text:p text:style-name="P1166"><text:span text:style-name="T1847">📝 핵심 요약</text:span><text:span/></text:p>
      <text:list text:style-name="WWNum74" text:continue-numbering="true">
        <text:list-item>
          <text:p text:style-name="P1167"><text:span text:style-name="T1848">생기차제와 원만차제 등의 밀교 수행을 하지 않은 범부는 죽음의 순간에 나타나는 미세한 의식을 다루지 못해.</text:span><text:span/></text:p>
        </text:list-item>
        <text:list-item>
          <text:p text:style-name="P1168"><text:span text:style-name="T1849">가상현실을 진짜 세상으로 착각하듯, 내면에서 일어나는 정신적 현상들을 오직 실재하는 것으로만 오인해.</text:span><text:span/></text:p>
        </text:list-item>
        <text:list-item>
          <text:p text:style-name="P1169"><text:span text:style-name="T1850">현상의 본질이 텅 비어 있다는 비실재의 진리를 알아차리는 맑은 지각이 범부에게는 일어나지 않아.</text:span><text:span/></text:p>
        </text:list-item>
        <text:list-item>
          <text:p text:style-name="P1170"><text:span text:style-name="T1851">스크린의 영화가 빛의 놀음임을 알듯, 평소에 도를 닦아야만 죽음의 순간에 현상의 실체를 꿰뚫어 볼 수 있어.</text:span><text:span/></text:p>
        </text:list-item>
      </text:list>
      <text:p text:style-name="P1171"><text:span><text:soft-page-break/></text:span><text:span/><text:span/></text:p>
      <text:p text:style-name="P1172"><text:span text:style-name="T1852">65. 모두에게 찾아오는 빛과 알아차림의 차이</text:span><text:span/></text:p>
      <text:p text:style-name="P1173"><text:span text:style-name="T1853">🔑 핵심 키워드: 사공의 보편성, 죽음의 정광명, 범부의 한계, 불확실한 체험, 확실한 지혜</text:span><text:span/></text:p>
      <text:p text:style-name="P1174"><text:span text:style-name="T1854">🌌 누구에게나 공평하게 열리는 사공의 문</text:span><text:span/></text:p>
      <text:p text:style-name="P1175"><text:span text:style-name="T1855">모든 생명체는 죽음의 순간에 네 가지 비움의 단계인 사공을 거치게 돼. 이건 신분이나 빈부격차, 혹은 살아생전의 업적과 상관없이 지구상의 모든 존재에게 주어지는 절대적으로 공평한 자연의 법칙이지. 비유하자면 비행기를 탄 모든 승객이 일등석이든 일반석이든 상관없이 목적지에 도착하면 똑같은 활주로를 통해 밖으로 나오는 것과 같아. 하지만 이 문이 열린다고 해서 누구나 자동으로 자유를 얻는 것은 아니야.</text:span><text:span/></text:p>
      <text:p text:style-name="P1176"><text:span text:style-name="T1856">🌫️ 준비되지 않은 자의 두려움과 안개</text:span><text:span/></text:p>
      <text:list text:style-name="WWNum75" text:continue-numbering="true">
        <text:list-item>
          <text:p text:style-name="P1177"><text:span text:style-name="T1857">마음의 상태: 평소에 마음을 닦는 수행을 하지 않은 평범한 이들에게 이 궁극의 정광명은 오히려 커다란 혼란으로 다가올 뿐이야.</text:span><text:span/></text:p>
        </text:list-item>
        <text:list-item>
          <text:p text:style-name="P1178"><text:span text:style-name="T1858">심리적 반응: 자신이 완전히 사라져 버릴지도 모른다는 극심한 공포와 두려움을 느끼게 되지.</text:span><text:span/></text:p>
        </text:list-item>
        <text:list-item>
          <text:p text:style-name="P1179"><text:span text:style-name="T1859">직관적 비유: 평생 어두운 동굴 속에서만 살던 사람이 갑자기 한여름의 강렬한 태양빛 아래로 던져졌을 때, 눈이 멀 것 같은 공포를 느끼며 본능적으로 눈을 가려버리는 것과 똑같아.</text:span><text:span/></text:p>
        </text:list-item>
      </text:list>
      <text:p text:style-name="P1180"><text:span text:style-name="T1860">🎭 스쳐 지나가는 불확실한 경험</text:span><text:span/></text:p>
      <table:table table:style-name="ta9">
        <table:table-columns>
          <table:table-column table:style-name="co22"/>
          <table:table-column table:style-name="co23"/>
        </table:table-columns>
        <table:table-header-rows>
          <table:table-row table:style-name="ro29" table:default-cell-style-name="ce81">
            <table:table-cell table:style-name="ce82">
              <text:p text:style-name="P1181"><text:span text:style-name="T1861">구분</text:span><text:span/></text:p>
            </table:table-cell>
            <table:table-cell table:style-name="ce83">
              <text:p text:style-name="P1182"><text:span text:style-name="T1862">범부의 인지 상태</text:span><text:span/></text:p>
            </table:table-cell>
          </table:table-row>
        </table:table-header-rows>
        <table:table-row table:style-name="ro30" table:default-cell-style-name="ce81">
          <table:table-cell table:style-name="ce84">
            <text:p text:style-name="P1183"><text:span text:style-name="T1863">경험의 성격</text:span><text:span/></text:p>
          </table:table-cell>
          <table:table-cell table:style-name="ce85">
            <text:p text:style-name="P1184"><text:span text:style-name="T1864">원초의 빛을 마주하지만 그것이 무엇인지 명확히 알지 못함</text:span><text:span/></text:p>
          </table:table-cell>
        </table:table-row>
        <table:table-row table:style-name="ro31" table:default-cell-style-name="ce81">
          <table:table-cell table:style-name="ce86">
            <text:p text:style-name="P1185"><text:span text:style-name="T1865">인지의 한계</text:span><text:span/></text:p>
          </table:table-cell>
          <table:table-cell table:style-name="ce87">
            <text:p text:style-name="P1186"><text:span text:style-name="T1866">꿈속에서 희미한 풍경을 보듯 불확실하고 모호하게 스쳐 지나감</text:span><text:span/></text:p>
          </table:table-cell>
        </table:table-row>
        <table:table-row table:style-name="ro32" table:default-cell-style-name="ce81">
          <table:table-cell table:style-name="ce88">
            <text:p text:style-name="P1187"><text:span text:style-name="T1867">결과</text:span><text:span/></text:p>
          </table:table-cell>
          <table:table-cell table:style-name="ce89">
            <text:p text:style-name="P1188"><text:span text:style-name="T1868">눈앞에 눈부신 보물이 나타났어도 그것의 가치를 알아보지 못하고 그냥 놓쳐버림</text:span><text:span/></text:p>
          </table:table-cell>
        </table:table-row>
      </table:table>
      <text:p text:style-name="P1189"><text:span text:style-name="T1869">이 단계에서 일어나는 정광명의 체험은 너무나 미세하고 순식간이라, 마음의 준비가 되어 있지 않으면 그저 눈을 깜빡이는 짧은 순간처럼 무의식적으로 흘려보내고 말아. 마치 최고급 명화를 보면서도 그것이 낙서인지 명작인지 구별하지 못하는 관객의 시선과 같지.</text:span><text:span/></text:p>
      <text:p text:style-name="P1190"><text:span text:style-name="T1870">💡 해탈을 결정짓는 확실한 지혜</text:span><text:span/></text:p>
      <text:p text:style-name="P1191"><text:span text:style-name="T1871">결국 죽음의 순간에 찾아오는 정광명을 통해 윤회를 벗어나기 위해서는 평소에 단단히 훈련된 확실한 지혜가 반드시 필요해. 빛이 지나는 찰나의 순간을 정확하게 알아차리고 그것과 나의 본성을 하나로 융합할 수 있는 정신적 힘이 있어야 하는 거지. 비유하자면 밤하늘에 순식간에 치는 번개를 놓치지 않고 카메라 셔터를 정확히 눌러 포착하는 숙련된 사진작가의 집중력과 같아. 이 지혜가 있을 때만 비로소 진정한 자유를 얻을 수 있어.</text:span><text:span/></text:p>
      <text:p text:style-name="P1192"><text:span text:style-name="T1872">📝 핵심 요약</text:span><text:span/></text:p>
      <text:list text:style-name="WWNum75" text:continue-numbering="true">
        <text:list-item>
          <text:p text:style-name="P1193"><text:span text:style-name="T1873">모든 존재는 죽음의 과정에서 네 가지 비움의 단계인 사공을 공평하게 경험함.</text:span><text:span/></text:p>
        </text:list-item>
        <text:list-item>
          <text:p text:style-name="P1194"><text:span text:style-name="T1874">사공을 겪는다고 해서 누구나 자동으로 해탈하는 것은 아니며, 범부에게는 오히려 공포가 될 수 있음.</text:span><text:span/></text:p>
        </text:list-item>
        <text:list-item>
          <text:p text:style-name="P1195"><text:span text:style-name="T1875">수행이 없는 이들은 원초의 빛인 정광명을 매우 불확실하고 모호하게 흘려보냄.</text:span><text:span/></text:p>
        </text:list-item>
        <text:list-item>
          <text:p text:style-name="P1196"><text:span text:style-name="T1876">윤회를 벗어나기 위해서는 그 찰나의 빛을 명확히 인지하고 결합할 수 있는 확실한 지혜가 필수적임.</text:span><text:span/></text:p>
        </text:list-item>
      </text:list>
      <text:p text:style-name="P1197"><text:span><text:soft-page-break/></text:span><text:span/><text:span/></text:p>
      <text:p text:style-name="P1198"><text:span text:style-name="T1877">[🟢 Online Mode | 26.06.01_14:03:37]</text:span><text:span/></text:p>
      <text:p text:style-name="P1199"><text:span text:style-name="T1878">66. 죽음의 순간에 완성되는 모자광명의 화합</text:span><text:span/></text:p>
      <text:p text:style-name="P1200"><text:span text:style-name="T1879">🔑 핵심 키워드: 죽음의 정광명, 어머니의 광명, 아들의 광명, 모자광명 화합, 해탈</text:span><text:span/></text:p>
      <text:p text:style-name="P1201"><text:span text:style-name="T1880">👩‍👦 근원적으로 존재하는 어머니의 광명</text:span><text:span/></text:p>
      <text:p text:style-name="P1202"><text:span text:style-name="T1881">우리가 죽음의 가장 깊은 단계에 다다랐을 때 자연스럽게 마주하게 되는 근원적인 빛이 있어. 이를 죽음의 정광명이라고 부르는데, 불교에서는 이 빛을 어머니의 광명이라는 따뜻한 이름으로 비유해. 이것은 우리가 세상에 태어나기 전부터 이미 존재하고 있던 영원한 마음의 고향이자, 언제든 돌아가면 나를 조건 없이 품어주는 거대하고 투명한 우주의 바탕과 같은 존재야. 마치 우리가 태어날 때부터 기본적으로 가지고 있는 거대한 흰색 도화지와 같다고 생각하면 이해하기 쉽</text:span><text:span text:style-name="T1882">지.</text:span><text:span/></text:p>
      <text:p text:style-name="P1203"><text:span text:style-name="T1883">💡 수행의 힘으로 피워낸 아들의 광명</text:span><text:span/></text:p>
      <text:p text:style-name="P1204"><text:span text:style-name="T1884">반면에 우리가 살아있는 동안 열심히 명상을 하고 마음을 닦아서 스스로 만들어내는 빛이 있어. 깨어있을 때는 물론이고 깊은 잠에 빠져 꿈을 꾸는 순간에도 알아차림을 유지하며 피워내는 깨달음의 빛을 아들의 광명이라고 부르지. 이것은 타고난 바탕이 아니라, 마치 어두운 방 안에서 스스로 불을 켜는 방법을 치열하게 연습해서 마침내 내 손으로 직접 밝혀낸 환한 전등 빛과 같은 거야. 후천적인 노력과 수행의 땀방울이 만들어낸 값진 결실이지.</text:span><text:span/></text:p>
      <text:p text:style-name="P1205"><text:span text:style-name="T1885">🤝 두 빛이 하나로 만나는 모자광명 화합</text:span><text:span/></text:p>
      <text:p text:style-name="P1206"><text:span text:style-name="T1886">마침내 육체의 수명이 다해 죽음의 정광명이 눈앞에 드러나는 그 순간, 평소에 명상으로 다져진 아들의 광명이 그 근원의 빛을 단번에 알아보고 서로 완벽하게 결합하게 돼. 이를 어머니와 아들의 빛이 마주해 하나가 된다는 뜻으로 모자광명의 화합이라고 불러. 오랜 세월 동안 먼 길을 돌아 방황하던 아들이 마침내 고향 집의 문을 열고 들어가 어머니의 따뜻한 품에 안기는 감격적인 상봉 장면을 상상해 봐. 안과 밖의 경계가 완전히 사라지며 두 빛이 본래 하나였음을 깨</text:span><text:span text:style-name="T1887">닫는 순간이야.</text:span><text:span/></text:p>
      <text:p text:style-name="P1207"><text:span text:style-name="T1888">🔓 죽음을 해탈의 기회로 바꾸는 위대한 순간</text:span><text:span/></text:p>
      <text:p text:style-name="P1208"><text:span text:style-name="T1889">이 모자광명의 화합이 일어날 때, 죽음은 더 이상 두렵고 고통스러운 종말이 아니라 온전한 자유를 얻는 최고의 해탈 기회로 완전히 뒤바뀌게 돼. 평소에 열심히 준비해 둔 아들의 광명이라는 열쇠가, 죽음의 순간에 맞춰 나타난 어머니의 광명이라는 자물쇠에 완벽하게 맞물려 돌아가는 거지. 이 화합을 통해 의식은 영원한 깨달음의 세계로 나아가게 되며, 평소의 수행이 왜 그토록 중요했는지를 증명하는 가장 위대하고 장엄한 마침표가 찍히는 셈이야.</text:span><text:span/></text:p>
      <text:p text:style-name="P1209"><text:span text:style-name="T1890">📝 핵심 요약</text:span><text:span/></text:p>
      <text:list text:style-name="WWNum76" text:continue-numbering="true">
        <text:list-item>
          <text:p text:style-name="P1210"><text:span text:style-name="T1891">죽음의 순간에 자연스럽게 드러나는 근원의 빛을 어머니의 광명이라고 한다.</text:span><text:span/></text:p>
        </text:list-item>
        <text:list-item>
          <text:p text:style-name="P1211"><text:span text:style-name="T1892">살아있는 동안 수행과 명상을 통해 자각해 낸 깨달음의 빛은 아들의 광명이다.</text:span><text:span/></text:p>
        </text:list-item>
        <text:list-item>
          <text:p text:style-name="P1212"><text:span text:style-name="T1893">죽음의 정광명 단계에서 이 두 가지 빛이 완벽하게 하나로 융합되는 것을 모자광명의 화합이라 부른다.</text:span><text:span/></text:p>
        </text:list-item>
        <text:list-item>
          <text:p text:style-name="P1213"><text:span text:style-name="T1894">이 화합을 성취하면 죽음이라는 순간을 영원한 해탈과 깨달음의 기회로 전환할 수 있다.</text:span><text:span/></text:p>
        </text:list-item>
      </text:list>
      <text:p text:style-name="P1214"><text:span><text:soft-page-break/></text:span><text:span/><text:span/></text:p>
      <text:p text:style-name="P1215"><text:span text:style-name="T1895">[🟢 Online Mode | 26.06.01_14:03:45]</text:span><text:span/></text:p>
      <text:p text:style-name="P1216"><text:span text:style-name="T1896">67. 진실한 광명과 이름뿐인 광명의 차이</text:span><text:span/></text:p>
      <text:p text:style-name="P1217"><text:span text:style-name="T1897">🔑 핵심 키워드: 진실광명, 모자광명 화합, 범부의 정광명, 이원분별의 정지</text:span><text:span/></text:p>
      <text:p text:style-name="P1218"><text:span text:style-name="T1898">❓ 죽음의 순간에 마주하는 빛의 진정한 정체</text:span><text:span/></text:p>
      <text:p text:style-name="P1219"><text:span text:style-name="T1899">우리가 죽음의 관문을 통과할 때 나타나는 정광명이 과연 모두에게 똑같은 진실한 깨달음의 빛일까라는 의문이 생길 수 있어. 결론부터 말하자면 겉으로 보이는 현상은 비슷할지 몰라도 그 내면의 질적인 가치는 하늘과 땅 차이야. 누구나 죽을 때 이 빛을 무의식적으로 경험하지만 그것이 모두에게 구원의 열쇠가 되는 것은 아니라는 점을 명확히 인지해야 해.</text:span><text:span/></text:p>
      <text:p text:style-name="P1220"><text:span text:style-name="T1900">🧘‍♂️ 수행자가 성취하는 모자광명의 눈부신 화합</text:span><text:span/></text:p>
      <text:p text:style-name="P1221"><text:span text:style-name="T1901">평생 동안 깊은 명상과 공성의 지혜를 닦은 수행자가 마주하는 빛은 그야말로 참된 진실광명이야. 평소 수행을 통해 기른 지혜의 빛인 자광명과 죽음의 순간에 자연스럽게 드러나는 근원의 빛인 모광명이 자석처럼 강력하게 결합하는 것이지. 이것은 마치 오랫동안 헤어져 있던 어머니와 아들이 서로를 단번에 알아보고 얼싸안는 것처럼 완벽한 하나가 되는 대전환이야.</text:span><text:span/></text:p>
      <text:p text:style-name="P1222"><text:span text:style-name="T1902">🌪️ 범부의 의식에서 일어나는 자동 종료 현상</text:span><text:span/></text:p>
      <text:p text:style-name="P1223"><text:span text:style-name="T1903">반면에 평범한 우리 같은 사람들이 죽을 때 경험하는 정광명은 진정한 의미의 진실광명이라고 보기 어려워. 단지 숨이 끊어지면서 거칠고 복잡했던 이분법적인 생각과 분별심들이 일시적으로 멈추었기 때문에 나타나는 대기 상태일 뿐이지. 컴퓨터에 치명적인 오류가 나거나 전원이 갑자기 차단되면 화면이 그냥 검게 변하며 먹통이 되는 것처럼 우리 의식도 거친 활동을 멈추며 일시적으로 멍해지는 순간에 불과해.</text:span><text:span/></text:p>
      <text:p text:style-name="P1224"><text:span text:style-name="T1904">🎬 극장 스크린의 암전이 주는 착시와 비유</text:span><text:span/></text:p>
      <text:p text:style-name="P1225"><text:span text:style-name="T1905">이 차이를 극장의 스크린에 비유하면 아주 이해하기 쉬워. 영화가 상영되던 스크린이 갑자기 깜깜해졌을 때 평범한 관객은 단지 상영이 끝났거나 필름이 끊겨서 아무것도 보이지 않는 어둠으로 받아들여. 하지만 영리한 감독은 그 암전된 순간이야말로 아무런 왜곡도 없는 스크린 본연의 순수한 백지 상태임을 명확히 꿰뚫어 보지. 범부의 정광명은 단순히 필름이 멈춘 어둠이고 수행자의 정광명은 스크린의 본질을 완벽하게 장악한 상태야.</text:span><text:span/></text:p>
      <text:p text:style-name="P1226"><text:span text:style-name="T1906">📝 핵심 요약</text:span><text:span/></text:p>
      <text:list text:style-name="WWNum77" text:continue-numbering="true">
        <text:list-item>
          <text:p text:style-name="P1227"><text:span text:style-name="T1907">죽음의 정광명은 모두에게 나타나지만 내면의 질적 가치는 수행자와 범부 사이에 뚜렷한 차이가 있다.</text:span><text:span/></text:p>
        </text:list-item>
        <text:list-item>
          <text:p text:style-name="P1228"><text:span text:style-name="T1908">수행자는 지혜의 빛과 근원의 빛을 화합시키는 모자광명 융합을 통해 진실한 광명을 성취한다.</text:span><text:span/></text:p>
        </text:list-item>
        <text:list-item>
          <text:p text:style-name="P1229"><text:span text:style-name="T1909">일반 범부의 정광명은 단지 거친 이원적 분별과 생각이 일시적으로 멈춘 상태에 이름을 붙인 것에 불과하다.</text:span><text:span/></text:p>
        </text:list-item>
        <text:list-item>
          <text:p text:style-name="P1230"><text:span text:style-name="T1910">본질을 꿰뚫어 보는 지혜가 없다면 자연적인 정광명은 깨달음으로 이어지지 않고 스치듯 지나쳐버리게 된다.</text:span><text:span/></text:p>
        </text:list-item>
      </text:list>
      <text:p text:style-name="P1231"><text:span><text:soft-page-break/></text:span><text:span/><text:span/></text:p>
      <text:p text:style-name="P1232"><text:span text:style-name="T1911">[🟢 Online Mode | 26.06.01_14:03:53]</text:span><text:span/></text:p>
      <text:p text:style-name="P1233"><text:span text:style-name="T1912">68. 두 가지 광명, 대상과 주체의 완벽한 이중주</text:span><text:span/></text:p>
      <text:p text:style-name="P1234"><text:span text:style-name="T1913">🔑 핵심 키워드: 경광명, 유경광명, 미세한 공성, 깨닫는 지혜</text:span><text:span/></text:p>
      <text:p text:style-name="P1235"><text:span text:style-name="T1914">🌌 세상의 본질을 드러내는 텅 빈 바탕, 경광명</text:span><text:span/></text:p>
      <text:p text:style-name="P1236"><text:span text:style-name="T1915">불교에서 말하는 광명에는 두 가지 신비로운 측면이 존재하는데, 그 첫 번째가 바로 경광명이야. 이것은 모든 존재의 본질이자 고정된 실체가 없다는 미세한 공성 그 자체를 의미하지. 마치 아무것도 그려지지 않은 거대하고 투명한 캔버스나, 무엇이든 비출 수 있도록 깨끗하게 닦인 텅 빈 거울의 상태와 아주 비슷해. 우주의 근본 바탕이 되는 이 청정한 비어 있음이야말로 우리가 마주해야 할 궁극의 관찰 대상인 셈이야.</text:span><text:span/></text:p>
      <text:p text:style-name="P1237"><text:span text:style-name="T1916">👁️ 그 바탕을 명확하게 꿰뚫어 보는 눈, 유경광명</text:span><text:span/></text:p>
      <text:p text:style-name="P1238"><text:span text:style-name="T1917">두 번째로 등장하는 유경광명은 앞서 말한 텅 빈 거울이나 캔버스를 완벽하게 알아차리는 주체적인 지혜를 뜻해. 거울이 아무리 깨끗하게 비어 있어도 그것을 바라보고 인식하는 명징한 눈이 없다면 아무런 의미가 없잖아. 어둠 속에서 사물을 비추는 밝은 손전등의 불빛처럼, 텅 빈 공성의 진리를 한 치의 오차도 없이 온전하고 명확하게 깨닫는 마음의 역동적인 인지 능력을 바로 유경광명이라고 불러.</text:span><text:span/></text:p>
      <text:p text:style-name="P1239"><text:span text:style-name="T1918">🎬 스크린과 상영기의 완벽한 호흡</text:span><text:span/></text:p>
      <text:p text:style-name="P1240"><text:span text:style-name="T1919">이 두 가지 광명의 관계는 극장의 대형 스크린과 영사기 불빛의 관계로 이해하면 훨씬 쉬워. 경광명이 아무런 얼룩도 없이 깨끗하게 드리워진 하얀 스크린이라면, 유경광명은 그 스크린을 향해 강력하고 순수한 빛을 쏘아 보내는 영사기라고 볼 수 있지. 스크린과 빛이 서로를 만나야 비로소 하나의 완벽한 영화가 완성되듯이, 내면의 영적 여정도 이 두 가지 요소가 조화롭게 어우러질 때 완성되는 법이야.</text:span><text:span/></text:p>
      <text:p text:style-name="P1241"><text:span text:style-name="T1920">🔑 진리와 지혜가 만나 이루는 해탈의 열쇠</text:span><text:span/></text:p>
      <text:p text:style-name="P1242"><text:span text:style-name="T1921">결국 온전한 깨달음에 이르기 위해서는 대상이 되는 공성의 진리와 그것을 알아보는 주체적인 지혜가 완벽하게 결합해야만 해. 넓은 바다와 그 바다를 온전히 담아내는 푸른 하늘이 수평선에서 하나로 맞닿는 풍경처럼 말이지. 이렇게 경광명과 유경광명이 내면에서 하나로 만날 때, 우리는 비로소 거친 미혹의 세계를 완전히 벗어나 변치 않는 궁극의 평온과 자유를 얻을 수 있게 돼.</text:span><text:span/></text:p>
      <text:p text:style-name="P1243"><text:span text:style-name="T1922">📝 핵심 요약</text:span><text:span/></text:p>
      <text:list text:style-name="WWNum78" text:continue-numbering="true">
        <text:list-item>
          <text:p text:style-name="P1244"><text:span text:style-name="T1923">광명은 대상이 되는 경광명과 주체가 되는 유경광명의 두 가지 측면으로 나뉨.</text:span><text:span/></text:p>
        </text:list-item>
        <text:list-item>
          <text:p text:style-name="P1245"><text:span text:style-name="T1924">경광명은 모든 존재의 본질인 미세한 공성이며, 무엇이든 비출 수 있는 텅 빈 거울과 같음.</text:span><text:span/></text:p>
        </text:list-item>
        <text:list-item>
          <text:p text:style-name="P1246"><text:span text:style-name="T1925">유경광명은 그 공성의 진리를 명확하게 알아차리고 깨닫는 주체적인 지혜의 빛임.</text:span><text:span/></text:p>
        </text:list-item>
        <text:list-item>
          <text:p text:style-name="P1247"><text:span text:style-name="T1926">이 두 가지 광명이 스크린과 영사기처럼 완벽한 조화를 이룰 때 궁극의 해탈이 완성됨.</text:span><text:span/></text:p>
        </text:list-item>
      </text:list>
      <text:p text:style-name="P1248"><text:span><text:soft-page-break/></text:span><text:span/><text:span/></text:p>
      <text:p text:style-name="P1249"><text:span text:style-name="T1927">69. 죽음의 시뮬레이션을 완성하는 정화의 설계도</text:span><text:span/></text:p>
      <text:p text:style-name="P1250"><text:span text:style-name="T1928">🔑 핵심 키워드: 생기차제, 원만차제, 법신, 비유광명, 승의광명</text:span><text:span/></text:p>
      <text:p text:style-name="P1251"><text:span text:style-name="T1929">🗺️ 죽음의 차제를 알아야 하는 이유</text:span><text:span/></text:p>
      <text:p text:style-name="P1252"><text:span text:style-name="T1930">죽음의 전 과정을 이토록 미세하게 나누어 관찰한 이유가 바로 여기에 있어. 밀교 최고의 수행 단계인 무상유가 딴뜨라에서는 이 임종의 순간을 단순한 끝이 아니라 궁극의 진리인 법신으로 도약하는 최고의 타이밍으로 보거든. 비유하자면 우주선이 지구 중력을 벗어나는 결정적인 순간을 정확히 계산해 두는 것과 같아. 이 타이밍을 놓치지 않으려면 죽음의 전조증상들을 완벽한 설계도처럼 미리 머릿속에 완전히 꿰고 있어야 해.</text:span><text:span/></text:p>
      <text:p text:style-name="P1253"><text:span text:style-name="T1931">🎮 깨달음을 위한 완벽한 시뮬레이션</text:span><text:span/></text:p>
      <text:p text:style-name="P1254"><text:span text:style-name="T1932">밀교 수행의 두 축인 상상으로 우주를 창조하는 생기차제와 몸의 에너지를 실제로 통제하는 원만차제는 일종의 죽음 시뮬레이션 게임과 같아. 우리가 가상현실 비행 시뮬레이터로 수없이 착륙 연습을 하는 이유는 실제 상황에서 당황하지 않고 안전하게 비행기를 조종하기 위해서잖아? 수행자들은 평소 명상을 통해 죽음의 단계를 미리 완벽하게 연습해 둠으로써, 실제 임종이 다가왔을 때 그 거대한 에너지의 변화를 깨달음의 도구로 능숙하게 다룰 수 있게 돼.</text:span><text:span/></text:p>
      <text:p text:style-name="P1255"><text:span text:style-name="T1933">🧼 의식을 리셋하는 주된 정화의 대상</text:span><text:span/></text:p>
      <text:p text:style-name="P1256"><text:span text:style-name="T1934">또한 이 단계들은 우리 내면의 때를 깨끗이 씻어내기 위한 주된 정화의 대상이기도 해. 우리가 태어나서 지금까지 쌓아온 온갖 집착과 거친 망상들을 가장 밑바닥에서부터 깨끗하게 청소하는 필터 시스템인 셈이지. 매일 쓰는 스마트폰의 메모리가 꽉 찼을 때 완전히 공장 초기화를 시켜서 처음의 깨끗한 상태로 돌려놓듯이, 죽음의 전조 현상들을 하나씩 통과하며 거친 의식들을 완전히 리셋하고 순수한 상태로 정화해 나가는 과정이야.</text:span><text:span/></text:p>
      <text:p text:style-name="P1257"><text:span text:style-name="T1935">🕯️ 비유광명과 승의광명이라는 지혜의 빛</text:span><text:span/></text:p>
      <text:p text:style-name="P1258"><text:span text:style-name="T1936">이 정화 과정을 거치면 마침내 두 가지 지혜의 빛을 마주하게 돼. 명상 속에서 미리 체험하는 예행연습의 빛인 비유광명과, 실제 죽음의 순간에 모든 분별이 끊어지며 드러나는 진짜 원초의 빛인 승의광명이 바로 그것이지. 마치 어두운 방안에 먼저 작은 촛불을 켜서 주변을 확인한 뒤에 마침내 아침 해가 떠오르며 온 세상을 황홀하게 비추는 것과 같아. 이 눈부신 빛을 온전히 내 것으로 만들기 위해서라도 지금 이 죽음의 차제를 정확하게 숙지하는 것이 무엇보다 중요해</text:span><text:span text:style-name="T1937">.</text:span><text:span/></text:p>
      <text:p text:style-name="P1259"><text:span text:style-name="T1938">📝 핵심 요약</text:span><text:span/></text:p>
      <text:list text:style-name="WWNum79" text:continue-numbering="true">
        <text:list-item>
          <text:p text:style-name="P1260"><text:span text:style-name="T1939">임종의 차제는 죽음을 궁극의 진리인 법신으로 전환하는 핵심 행법임</text:span><text:span/></text:p>
        </text:list-item>
        <text:list-item>
          <text:p text:style-name="P1261"><text:span text:style-name="T1940">생기차제와 원만차제를 통한 수행은 실제 죽음의 순간을 통제하기 위한 예행연습임</text:span><text:span/></text:p>
        </text:list-item>
        <text:list-item>
          <text:p text:style-name="P1262"><text:span text:style-name="T1941">죽음의 과정에서 나타나는 현상들은 거친 의식과 망상을 씻어내는 주된 정화의 대상임</text:span><text:span/></text:p>
        </text:list-item>
        <text:list-item>
          <text:p text:style-name="P1263"><text:span text:style-name="T1942">명상 중의 비유광명과 실제 죽음의 승의광명을 결합하여 궁극의 깨달음을 성취함</text:span><text:span/></text:p>
        </text:list-item>
      </text:list>
      <text:p text:style-name="P126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style:tab-stop-distance="35.4pt" fo:margin-top="0pt"/>
      <style:text-properties fo:font-family="Arial" style:font-family-asian="Arial" style:font-family-complex="Arial" fo:font-size="11pt" style:font-size-complex="11pt" fo:language="en" style:language-complex="ar" fo:country="US" style:country-complex="SA"/>
    </style:default-style>
    <style:default-style style:family="text">
      <style:text-properties fo:font-family="Arial" style:font-family-asian="Arial" style:font-family-complex="Arial" fo:font-size="11pt" style:font-size-complex="11pt" fo:language="en" style:language-complex="ar" fo:country="US"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1006" style:display-name="Heading 1" style:family="paragraph" style:name="947">
      <style:paragraph-properties fo:margin-top="18pt" fo:margin-bottom="4pt"/>
      <style:text-properties fo:color="#0f4761" fo:font-family="Arial" style:font-family-asian="Arial" style:font-family-complex="Arial" fo:font-size="20pt" style:font-size-complex="20pt"/>
    </style:style>
    <style:style style:parent-style-name="1006" style:display-name="Heading 2" style:family="paragraph" style:name="948">
      <style:paragraph-properties fo:margin-top="8pt" fo:margin-bottom="4pt"/>
      <style:text-properties fo:color="#0f4761" fo:font-family="Arial" style:font-family-asian="Arial" style:font-family-complex="Arial" fo:font-size="16pt" style:font-size-complex="16pt"/>
    </style:style>
    <style:style style:parent-style-name="1006" style:display-name="Heading 3" style:family="paragraph" style:name="949">
      <style:paragraph-properties fo:margin-top="8pt" fo:margin-bottom="4pt"/>
      <style:text-properties fo:color="#0f4761" fo:font-family="Arial" style:font-family-asian="Arial" style:font-family-complex="Arial" fo:font-size="14pt" style:font-size-complex="14pt"/>
    </style:style>
    <style:style style:parent-style-name="1006" style:display-name="Heading 4" style:family="paragraph" style:name="950">
      <style:paragraph-properties fo:margin-top="4pt" fo:margin-bottom="2pt"/>
      <style:text-properties fo:color="#0f4761" fo:font-family="Arial" style:font-family-asian="Arial" style:font-family-complex="Arial" fo:font-style="italic"/>
    </style:style>
    <style:style style:parent-style-name="1006" style:display-name="Heading 5" style:family="paragraph" style:name="951">
      <style:paragraph-properties fo:margin-top="4pt" fo:margin-bottom="2pt"/>
      <style:text-properties fo:color="#0f4761" fo:font-family="Arial" style:font-family-asian="Arial" style:font-family-complex="Arial"/>
    </style:style>
    <style:style style:parent-style-name="1006" style:display-name="Heading 6" style:family="paragraph" style:name="952">
      <style:paragraph-properties fo:margin-top="2pt" fo:margin-bottom="0pt"/>
      <style:text-properties fo:color="#595959" fo:font-family="Arial" style:font-family-asian="Arial" style:font-family-complex="Arial" fo:font-style="italic"/>
    </style:style>
    <style:style style:parent-style-name="1006" style:display-name="Heading 7" style:family="paragraph" style:name="953">
      <style:paragraph-properties fo:margin-top="2pt" fo:margin-bottom="0pt"/>
      <style:text-properties fo:color="#595959" fo:font-family="Arial" style:font-family-asian="Arial" style:font-family-complex="Arial"/>
    </style:style>
    <style:style style:parent-style-name="1006" style:display-name="Heading 8" style:family="paragraph" style:name="954">
      <style:paragraph-properties fo:margin-bottom="0pt"/>
      <style:text-properties fo:color="#272727" fo:font-family="Arial" style:font-family-asian="Arial" style:font-family-complex="Arial" fo:font-style="italic"/>
    </style:style>
    <style:style style:parent-style-name="1006" style:display-name="Heading 9" style:family="paragraph" style:name="955">
      <style:paragraph-properties fo:margin-bottom="0pt"/>
      <style:text-properties fo:color="#272727" fo:font-family="Arial" style:font-family-asian="Arial" style:font-family-complex="Arial" fo:font-style="italic"/>
    </style:style>
    <style:style style:class="default" style:display-name="Default Paragraph Font" style:family="text" style:name="956">
      <style:paragraph-properties fo:line-height="100%" fo:margin-top="0pt"/>
    </style:style>
    <style:style style:parent-style-name="956" style:display-name="Heading 1 Char" style:family="text" style:name="957">
      <style:paragraph-properties/>
      <style:text-properties fo:color="#0f4761" fo:font-family="Arial" style:font-family-asian="Arial" style:font-family-complex="Arial" fo:font-size="20pt" style:font-size-complex="20pt"/>
    </style:style>
    <style:style style:parent-style-name="956" style:display-name="Heading 2 Char" style:family="text" style:name="958">
      <style:paragraph-properties/>
      <style:text-properties fo:color="#0f4761" fo:font-family="Arial" style:font-family-asian="Arial" style:font-family-complex="Arial" fo:font-size="16pt" style:font-size-complex="16pt"/>
    </style:style>
    <style:style style:parent-style-name="956" style:display-name="Heading 3 Char" style:family="text" style:name="959">
      <style:paragraph-properties/>
      <style:text-properties fo:color="#0f4761" fo:font-family="Arial" style:font-family-asian="Arial" style:font-family-complex="Arial" fo:font-size="14pt" style:font-size-complex="14pt"/>
    </style:style>
    <style:style style:parent-style-name="956" style:display-name="Heading 4 Char" style:family="text" style:name="960">
      <style:paragraph-properties/>
      <style:text-properties fo:color="#0f4761" fo:font-family="Arial" style:font-family-asian="Arial" style:font-family-complex="Arial" fo:font-style="italic"/>
    </style:style>
    <style:style style:parent-style-name="956" style:display-name="Heading 5 Char" style:family="text" style:name="961">
      <style:paragraph-properties/>
      <style:text-properties fo:color="#0f4761" fo:font-family="Arial" style:font-family-asian="Arial" style:font-family-complex="Arial"/>
    </style:style>
    <style:style style:parent-style-name="956" style:display-name="Heading 6 Char" style:family="text" style:name="962">
      <style:paragraph-properties/>
      <style:text-properties fo:color="#595959" fo:font-family="Arial" style:font-family-asian="Arial" style:font-family-complex="Arial" fo:font-style="italic"/>
    </style:style>
    <style:style style:parent-style-name="956" style:display-name="Heading 7 Char" style:family="text" style:name="963">
      <style:paragraph-properties/>
      <style:text-properties fo:color="#595959" fo:font-family="Arial" style:font-family-asian="Arial" style:font-family-complex="Arial"/>
    </style:style>
    <style:style style:parent-style-name="956" style:display-name="Heading 8 Char" style:family="text" style:name="964">
      <style:paragraph-properties/>
      <style:text-properties fo:color="#272727" fo:font-family="Arial" style:font-family-asian="Arial" style:font-family-complex="Arial" fo:font-style="italic"/>
    </style:style>
    <style:style style:parent-style-name="956" style:display-name="Heading 9 Char" style:family="text" style:name="965">
      <style:paragraph-properties/>
      <style:text-properties fo:color="#272727" fo:font-family="Arial" style:font-family-asian="Arial" style:font-family-complex="Arial" fo:font-style="italic"/>
    </style:style>
    <style:style style:parent-style-name="1006" style:display-name="Title" style:family="paragraph" style:name="966">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956" style:display-name="Title Char" style:family="text" style:name="967">
      <style:paragraph-properties/>
      <style:text-properties fo:font-family="Arial" style:font-family-asian="Arial" style:font-family-complex="Arial" fo:font-size="28pt" style:font-size-complex="28pt" fo:letter-spacing="-0.5pt"/>
    </style:style>
    <style:style style:parent-style-name="1006" style:display-name="Subtitle" style:family="paragraph" style:name="968">
      <style:paragraph-properties/>
      <style:text-properties fo:color="#595959" fo:font-size="14pt" style:font-size-complex="14pt" fo:letter-spacing="0.75pt"/>
    </style:style>
    <style:style style:parent-style-name="956" style:display-name="Subtitle Char" style:family="text" style:name="969">
      <style:paragraph-properties/>
      <style:text-properties fo:color="#595959" fo:font-size="14pt" style:font-size-complex="14pt" fo:letter-spacing="0.75pt"/>
    </style:style>
    <style:style style:parent-style-name="1006" style:display-name="Quote" style:family="paragraph" style:name="970">
      <style:paragraph-properties fo:text-align="center" fo:margin-top="8pt"/>
      <style:text-properties fo:color="#404040" fo:font-style="italic"/>
    </style:style>
    <style:style style:parent-style-name="956" style:display-name="Quote Char" style:family="text" style:name="971">
      <style:paragraph-properties/>
      <style:text-properties fo:color="#404040" fo:font-style="italic"/>
    </style:style>
    <style:style style:parent-style-name="956" style:display-name="Intense Emphasis" style:family="text" style:name="972">
      <style:paragraph-properties/>
      <style:text-properties fo:color="#0f4761" fo:font-style="italic"/>
    </style:style>
    <style:style style:parent-style-name="1006" style:display-name="Intense Quote" style:family="paragraph" style:name="973">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956" style:display-name="Intense Quote Char" style:family="text" style:name="974">
      <style:paragraph-properties/>
      <style:text-properties fo:color="#0f4761" fo:font-style="italic"/>
    </style:style>
    <style:style style:parent-style-name="956" style:display-name="Intense Reference" style:family="text" style:name="975">
      <style:paragraph-properties/>
      <style:text-properties fo:font-variant="small-caps" fo:color="#0f4761" fo:letter-spacing="0.25pt" fo:font-weight="bold"/>
    </style:style>
    <style:style style:parent-style-name="956" style:display-name="Subtle Emphasis" style:family="text" style:name="976">
      <style:paragraph-properties/>
      <style:text-properties fo:color="#404040" fo:font-style="italic"/>
    </style:style>
    <style:style style:parent-style-name="956" style:display-name="Emphasis" style:family="text" style:name="977">
      <style:paragraph-properties/>
      <style:text-properties fo:font-style="italic"/>
    </style:style>
    <style:style style:parent-style-name="956" style:display-name="Strong" style:family="text" style:name="978">
      <style:paragraph-properties/>
      <style:text-properties fo:font-weight="bold"/>
    </style:style>
    <style:style style:parent-style-name="956" style:display-name="Subtle Reference" style:family="text" style:name="979">
      <style:paragraph-properties/>
      <style:text-properties fo:font-variant="small-caps" fo:color="#5a5a5a"/>
    </style:style>
    <style:style style:parent-style-name="956" style:display-name="Book Title" style:family="text" style:name="980">
      <style:paragraph-properties/>
      <style:text-properties fo:letter-spacing="0.25pt" fo:font-style="italic" fo:font-weight="bold"/>
    </style:style>
    <style:style style:parent-style-name="1006" style:display-name="Header" style:family="paragraph" style:name="981">
      <style:paragraph-properties fo:line-height="100%" fo:margin-bottom="0pt">
        <style:tab-stops>
          <style:tab-stop style:position="8.545cm" style:type="center"/>
          <style:tab-stop style:position="17.09cm" style:type="right"/>
        </style:tab-stops>
      </style:paragraph-properties>
    </style:style>
    <style:style style:parent-style-name="956" style:display-name="Header Char" style:family="text" style:name="982">
      <style:paragraph-properties/>
    </style:style>
    <style:style style:parent-style-name="1006" style:display-name="Footer" style:family="paragraph" style:name="983">
      <style:paragraph-properties fo:line-height="100%" fo:margin-bottom="0pt">
        <style:tab-stops>
          <style:tab-stop style:position="8.545cm" style:type="center"/>
          <style:tab-stop style:position="17.09cm" style:type="right"/>
        </style:tab-stops>
      </style:paragraph-properties>
    </style:style>
    <style:style style:parent-style-name="956" style:display-name="Footer Char" style:family="text" style:name="984">
      <style:paragraph-properties/>
    </style:style>
    <style:style style:parent-style-name="1006" style:display-name="Caption" style:family="paragraph" style:name="985">
      <style:paragraph-properties fo:line-height="100%" fo:margin-bottom="10pt"/>
      <style:text-properties fo:color="#0e2841" fo:font-size="9pt" style:font-size-complex="9pt" fo:font-style="italic"/>
    </style:style>
    <style:style style:parent-style-name="1006" style:display-name="footnote text" style:family="paragraph" style:name="986">
      <style:paragraph-properties fo:line-height="100%" fo:margin-bottom="0pt"/>
      <style:text-properties fo:font-size="10pt" style:font-size-complex="10pt"/>
    </style:style>
    <style:style style:parent-style-name="956" style:display-name="Footnote Text Char" style:family="text" style:name="987">
      <style:paragraph-properties/>
      <style:text-properties fo:font-size="10pt" style:font-size-complex="10pt"/>
    </style:style>
    <style:style style:parent-style-name="956" style:display-name="footnote reference" style:family="text" style:name="988">
      <style:paragraph-properties/>
      <style:text-properties style:text-position="super 58%"/>
    </style:style>
    <style:style style:parent-style-name="1006" style:display-name="endnote text" style:family="paragraph" style:name="989">
      <style:paragraph-properties fo:line-height="100%" fo:margin-bottom="0pt"/>
      <style:text-properties fo:font-size="10pt" style:font-size-complex="10pt"/>
    </style:style>
    <style:style style:parent-style-name="956" style:display-name="Endnote Text Char" style:family="text" style:name="990">
      <style:paragraph-properties/>
      <style:text-properties fo:font-size="10pt" style:font-size-complex="10pt"/>
    </style:style>
    <style:style style:parent-style-name="956" style:display-name="endnote reference" style:family="text" style:name="991">
      <style:paragraph-properties/>
      <style:text-properties style:text-position="super 58%"/>
    </style:style>
    <style:style style:parent-style-name="956" style:display-name="Hyperlink" style:family="text" style:name="992">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956" style:display-name="FollowedHyperlink" style:family="text" style:name="993">
      <style:paragraph-properties/>
      <style:text-properties fo:color="#954f72" style:text-underline-type="single" style:text-underline-style="solid" style:text-underline-width="auto" style:text-underline-color="font-color"/>
    </style:style>
    <style:style style:parent-style-name="1006" style:display-name="toc 1" style:family="paragraph" style:name="994">
      <style:paragraph-properties fo:margin-bottom="5pt"/>
    </style:style>
    <style:style style:parent-style-name="1006" style:display-name="toc 2" style:family="paragraph" style:name="995">
      <style:paragraph-properties fo:margin-left="0.3881cm" fo:margin-bottom="5pt"/>
    </style:style>
    <style:style style:parent-style-name="1006" style:display-name="toc 3" style:family="paragraph" style:name="996">
      <style:paragraph-properties fo:margin-left="0.7762cm" fo:margin-bottom="5pt"/>
    </style:style>
    <style:style style:parent-style-name="1006" style:display-name="toc 4" style:family="paragraph" style:name="997">
      <style:paragraph-properties fo:margin-left="1.164cm" fo:margin-bottom="5pt"/>
    </style:style>
    <style:style style:parent-style-name="1006" style:display-name="toc 5" style:family="paragraph" style:name="998">
      <style:paragraph-properties fo:margin-left="1.552cm" fo:margin-bottom="5pt"/>
    </style:style>
    <style:style style:parent-style-name="1006" style:display-name="toc 6" style:family="paragraph" style:name="999">
      <style:paragraph-properties fo:margin-left="1.94cm" fo:margin-bottom="5pt"/>
    </style:style>
    <style:style style:parent-style-name="1006" style:display-name="toc 7" style:family="paragraph" style:name="1000">
      <style:paragraph-properties fo:margin-left="2.328cm" fo:margin-bottom="5pt"/>
    </style:style>
    <style:style style:parent-style-name="1006" style:display-name="toc 8" style:family="paragraph" style:name="1001">
      <style:paragraph-properties fo:margin-left="2.717cm" fo:margin-bottom="5pt"/>
    </style:style>
    <style:style style:parent-style-name="1006" style:display-name="toc 9" style:family="paragraph" style:name="1002">
      <style:paragraph-properties fo:margin-left="3.105cm" fo:margin-bottom="5pt"/>
    </style:style>
    <style:style style:parent-style-name="956" style:display-name="Placeholder Text" style:family="text" style:name="1003">
      <style:paragraph-properties/>
      <style:text-properties fo:color="#666666"/>
    </style:style>
    <style:style style:display-name="TOC Heading" style:family="paragraph" style:name="1004">
      <style:paragraph-properties/>
    </style:style>
    <style:style style:parent-style-name="1006" style:display-name="table of figures" style:family="paragraph" style:name="1005">
      <style:paragraph-properties fo:margin-bottom="0pt"/>
    </style:style>
    <style:style style:class="default" style:display-name="Normal" style:family="paragraph" style:name="1006">
      <style:paragraph-properties fo:line-height="100%" fo:margin-top="0pt"/>
      <style:text-properties/>
    </style:style>
    <style:style style:parent-style-name="1006" style:display-name="No Spacing" style:family="paragraph" style:name="1009">
      <style:paragraph-properties fo:line-height="100%" fo:margin-bottom="0pt"/>
    </style:style>
    <style:style style:parent-style-name="1006" style:display-name="List Paragraph" style:family="paragraph" style:name="1010">
      <style:paragraph-properties fo:margin-left="1.27cm" style:contextual-spacing="true"/>
      <style:text-properties/>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font-family-asian="Symbol" style:font-family-complex="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font-family-asian="Symbol" style:font-family-complex="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font-family-asian="Symbol" style:font-family-complex="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font-family-asian="Symbol" style:font-family-complex="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Symbol" style:font-family-asian="Symbol" style:font-family-complex="Symbol"/>
    </style:style>
    <style:style style:family="text" style:name="T155">
      <style:text-properties fo:font-family="Courier New" style:font-family-asian="Courier New" style:font-family-complex="Courier New"/>
    </style:style>
    <style:style style:family="text" style:name="T156">
      <style:text-properties fo:font-family="Wingdings" style:font-family-asian="Wingdings" style:font-family-complex="Wingdings"/>
    </style:style>
    <style:style style:family="text" style:name="T157">
      <style:text-properties fo:font-family="Symbol" style:font-family-asian="Symbol" style:font-family-complex="Symbol"/>
    </style:style>
    <style:style style:family="text" style:name="T158">
      <style:text-properties fo:font-family="Courier New" style:font-family-asian="Courier New" style:font-family-complex="Courier New"/>
    </style:style>
    <style:style style:family="text" style:name="T159">
      <style:text-properties fo:font-family="Wingdings" style:font-family-asian="Wingdings" style:font-family-complex="Wingdings"/>
    </style:style>
    <style:style style:family="text" style:name="T160">
      <style:text-properties fo:font-family="Symbol" style:font-family-asian="Symbol" style:font-family-complex="Symbol"/>
    </style:style>
    <style:style style:family="text" style:name="T161">
      <style:text-properties fo:font-family="Courier New" style:font-family-asian="Courier New" style:font-family-complex="Courier New"/>
    </style:style>
    <style:style style:family="text" style:name="T162">
      <style:text-properties fo:font-family="Wingdings" style:font-family-asian="Wingdings" style:font-family-complex="Wingdings"/>
    </style:style>
    <style:style style:family="text" style:name="T163">
      <style:text-properties fo:font-family="Symbol" style:font-family-asian="Symbol" style:font-family-complex="Symbol"/>
    </style:style>
    <style:style style:family="text" style:name="T164">
      <style:text-properties fo:font-family="Courier New" style:font-family-asian="Courier New" style:font-family-complex="Courier New"/>
    </style:style>
    <style:style style:family="text" style:name="T165">
      <style:text-properties fo:font-family="Wingdings" style:font-family-asian="Wingdings" style:font-family-complex="Wingdings"/>
    </style:style>
    <style:style style:family="text" style:name="T166">
      <style:text-properties fo:font-family="Symbol" style:font-family-asian="Symbol" style:font-family-complex="Symbol"/>
    </style:style>
    <style:style style:family="text" style:name="T167">
      <style:text-properties fo:font-family="Courier New" style:font-family-asian="Courier New" style:font-family-complex="Courier New"/>
    </style:style>
    <style:style style:family="text" style:name="T168">
      <style:text-properties fo:font-family="Wingdings" style:font-family-asian="Wingdings" style:font-family-complex="Wingdings"/>
    </style:style>
    <style:style style:family="text" style:name="T169">
      <style:text-properties fo:font-family="Symbol" style:font-family-asian="Symbol" style:font-family-complex="Symbol"/>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Symbol" style:font-family-asian="Symbol" style:font-family-complex="Symbol"/>
    </style:style>
    <style:style style:family="text" style:name="T179">
      <style:text-properties fo:font-family="Courier New" style:font-family-asian="Courier New" style:font-family-complex="Courier New"/>
    </style:style>
    <style:style style:family="text" style:name="T180">
      <style:text-properties fo:font-family="Wingdings" style:font-family-asian="Wingdings" style:font-family-complex="Wingdings"/>
    </style:style>
    <style:style style:family="text" style:name="T181">
      <style:text-properties fo:font-family="Symbol" style:font-family-asian="Symbol" style:font-family-complex="Symbol"/>
    </style:style>
    <style:style style:family="text" style:name="T182">
      <style:text-properties fo:font-family="Courier New" style:font-family-asian="Courier New" style:font-family-complex="Courier New"/>
    </style:style>
    <style:style style:family="text" style:name="T183">
      <style:text-properties fo:font-family="Wingdings" style:font-family-asian="Wingdings" style:font-family-complex="Wingdings"/>
    </style:style>
    <style:style style:family="text" style:name="T184">
      <style:text-properties fo:font-family="Symbol" style:font-family-asian="Symbol" style:font-family-complex="Symbol"/>
    </style:style>
    <style:style style:family="text" style:name="T185">
      <style:text-properties fo:font-family="Courier New" style:font-family-asian="Courier New" style:font-family-complex="Courier New"/>
    </style:style>
    <style:style style:family="text" style:name="T186">
      <style:text-properties fo:font-family="Wingdings" style:font-family-asian="Wingdings" style:font-family-complex="Wingdings"/>
    </style:style>
    <style:style style:family="text" style:name="T187">
      <style:text-properties fo:font-family="Symbol" style:font-family-asian="Symbol" style:font-family-complex="Symbol"/>
    </style:style>
    <style:style style:family="text" style:name="T188">
      <style:text-properties fo:font-family="Courier New" style:font-family-asian="Courier New" style:font-family-complex="Courier New"/>
    </style:style>
    <style:style style:family="text" style:name="T189">
      <style:text-properties fo:font-family="Wingdings" style:font-family-asian="Wingdings" style:font-family-complex="Wingdings"/>
    </style:style>
    <style:style style:family="text" style:name="T190">
      <style:text-properties fo:font-family="Symbol" style:font-family-asian="Symbol" style:font-family-complex="Symbol"/>
    </style:style>
    <style:style style:family="text" style:name="T191">
      <style:text-properties fo:font-family="Courier New" style:font-family-asian="Courier New" style:font-family-complex="Courier New"/>
    </style:style>
    <style:style style:family="text" style:name="T192">
      <style:text-properties fo:font-family="Wingdings" style:font-family-asian="Wingdings" style:font-family-complex="Wingdings"/>
    </style:style>
    <style:style style:family="text" style:name="T193">
      <style:text-properties fo:font-family="Symbol" style:font-family-asian="Symbol" style:font-family-complex="Symbol"/>
    </style:style>
    <style:style style:family="text" style:name="T194">
      <style:text-properties fo:font-family="Courier New" style:font-family-asian="Courier New" style:font-family-complex="Courier New"/>
    </style:style>
    <style:style style:family="text" style:name="T195">
      <style:text-properties fo:font-family="Wingdings" style:font-family-asian="Wingdings" style:font-family-complex="Wingdings"/>
    </style:style>
    <style:style style:family="text" style:name="T196">
      <style:text-properties fo:font-family="Symbol" style:font-family-asian="Symbol" style:font-family-complex="Symbol"/>
    </style:style>
    <style:style style:family="text" style:name="T197">
      <style:text-properties fo:font-family="Courier New" style:font-family-asian="Courier New" style:font-family-complex="Courier New"/>
    </style:style>
    <style:style style:family="text" style:name="T198">
      <style:text-properties fo:font-family="Wingdings" style:font-family-asian="Wingdings" style:font-family-complex="Wingdings"/>
    </style:style>
    <style:style style:family="text" style:name="T199">
      <style:text-properties fo:font-family="Symbol" style:font-family-asian="Symbol" style:font-family-complex="Symbol"/>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fo:font-family="Symbol" style:font-family-asian="Symbol" style:font-family-complex="Symbol"/>
    </style:style>
    <style:style style:family="text" style:name="T209">
      <style:text-properties fo:font-family="Courier New" style:font-family-asian="Courier New" style:font-family-complex="Courier New"/>
    </style:style>
    <style:style style:family="text" style:name="T210">
      <style:text-properties fo:font-family="Wingdings" style:font-family-asian="Wingdings" style:font-family-complex="Wingdings"/>
    </style:style>
    <style:style style:family="text" style:name="T211">
      <style:text-properties fo:font-family="Symbol" style:font-family-asian="Symbol" style:font-family-complex="Symbol"/>
    </style:style>
    <style:style style:family="text" style:name="T212">
      <style:text-properties fo:font-family="Courier New" style:font-family-asian="Courier New" style:font-family-complex="Courier New"/>
    </style:style>
    <style:style style:family="text" style:name="T213">
      <style:text-properties fo:font-family="Wingdings" style:font-family-asian="Wingdings" style:font-family-complex="Wingdings"/>
    </style:style>
    <style:style style:family="text" style:name="T214">
      <style:text-properties fo:font-family="Symbol" style:font-family-asian="Symbol" style:font-family-complex="Symbol"/>
    </style:style>
    <style:style style:family="text" style:name="T215">
      <style:text-properties fo:font-family="Courier New" style:font-family-asian="Courier New" style:font-family-complex="Courier New"/>
    </style:style>
    <style:style style:family="text" style:name="T216">
      <style:text-properties fo:font-family="Wingdings" style:font-family-asian="Wingdings" style:font-family-complex="Wingdings"/>
    </style:style>
    <style:style style:family="text" style:name="T217">
      <style:text-properties fo:font-family="Symbol" style:font-family-asian="Symbol" style:font-family-complex="Symbol"/>
    </style:style>
    <style:style style:family="text" style:name="T218">
      <style:text-properties fo:font-family="Courier New" style:font-family-asian="Courier New" style:font-family-complex="Courier New"/>
    </style:style>
    <style:style style:family="text" style:name="T219">
      <style:text-properties fo:font-family="Wingdings" style:font-family-asian="Wingdings" style:font-family-complex="Wingdings"/>
    </style:style>
    <style:style style:family="text" style:name="T220">
      <style:text-properties fo:font-family="Symbol" style:font-family-asian="Symbol" style:font-family-complex="Symbol"/>
    </style:style>
    <style:style style:family="text" style:name="T221">
      <style:text-properties fo:font-family="Courier New" style:font-family-asian="Courier New" style:font-family-complex="Courier New"/>
    </style:style>
    <style:style style:family="text" style:name="T222">
      <style:text-properties fo:font-family="Wingdings" style:font-family-asian="Wingdings" style:font-family-complex="Wingdings"/>
    </style:style>
    <style:style style:family="text" style:name="T223">
      <style:text-properties fo:font-family="Symbol" style:font-family-asian="Symbol" style:font-family-complex="Symbol"/>
    </style:style>
    <style:style style:family="text" style:name="T224">
      <style:text-properties fo:font-family="Courier New" style:font-family-asian="Courier New" style:font-family-complex="Courier New"/>
    </style:style>
    <style:style style:family="text" style:name="T225">
      <style:text-properties fo:font-family="Wingdings" style:font-family-asian="Wingdings" style:font-family-complex="Wingdings"/>
    </style:style>
    <style:style style:family="text" style:name="T226">
      <style:text-properties fo:font-family="Symbol" style:font-family-asian="Symbol" style:font-family-complex="Symbol"/>
    </style:style>
    <style:style style:family="text" style:name="T227">
      <style:text-properties fo:font-family="Courier New" style:font-family-asian="Courier New" style:font-family-complex="Courier New"/>
    </style:style>
    <style:style style:family="text" style:name="T228">
      <style:text-properties fo:font-family="Wingdings" style:font-family-asian="Wingdings" style:font-family-complex="Wingdings"/>
    </style:style>
    <style:style style:family="text" style:name="T229">
      <style:text-properties fo:font-family="Symbol" style:font-family-asian="Symbol" style:font-family-complex="Symbol"/>
    </style:style>
    <style:style style:family="text" style:name="T230">
      <style:text-properties fo:font-family="Courier New" style:font-family-asian="Courier New" style:font-family-complex="Courier New"/>
    </style:style>
    <style:style style:family="text" style:name="T231">
      <style:text-properties fo:font-family="Wingdings" style:font-family-asian="Wingdings" style:font-family-complex="Wingdings"/>
    </style:style>
    <style:style style:family="text" style:name="T232">
      <style:text-properties fo:font-family="Symbol" style:font-family-asian="Symbol" style:font-family-complex="Symbol"/>
    </style:style>
    <style:style style:family="text" style:name="T233">
      <style:text-properties fo:font-family="Courier New" style:font-family-asian="Courier New" style:font-family-complex="Courier New"/>
    </style:style>
    <style:style style:family="text" style:name="T234">
      <style:text-properties fo:font-family="Wingdings" style:font-family-asian="Wingdings" style:font-family-complex="Wingdings"/>
    </style:style>
    <style:style style:family="text" style:name="T235">
      <style:text-properties fo:font-family="Symbol" style:font-family-asian="Symbol" style:font-family-complex="Symbol"/>
    </style:style>
    <style:style style:family="text" style:name="T236">
      <style:text-properties fo:font-family="Courier New" style:font-family-asian="Courier New" style:font-family-complex="Courier New"/>
    </style:style>
    <style:style style:family="text" style:name="T237">
      <style:text-properties fo:font-family="Wingdings" style:font-family-asian="Wingdings" style:font-family-complex="Wingdings"/>
    </style:style>
    <style:style style:family="text" style:name="T238">
      <style:text-properties fo:font-family="Symbol" style:font-family-asian="Symbol" style:font-family-complex="Symbol"/>
    </style:style>
    <style:style style:family="text" style:name="T239">
      <style:text-properties fo:font-family="Courier New" style:font-family-asian="Courier New" style:font-family-complex="Courier New"/>
    </style:style>
    <style:style style:family="text" style:name="T240">
      <style:text-properties fo:font-family="Wingdings" style:font-family-asian="Wingdings" style:font-family-complex="Wingdings"/>
    </style:style>
    <style:style style:family="text" style:name="T241">
      <style:text-properties fo:font-family="Symbol" style:font-family-asian="Symbol" style:font-family-complex="Symbol"/>
    </style:style>
    <style:style style:family="text" style:name="T242">
      <style:text-properties fo:font-family="Courier New" style:font-family-asian="Courier New" style:font-family-complex="Courier New"/>
    </style:style>
    <style:style style:family="text" style:name="T243">
      <style:text-properties fo:font-family="Wingdings" style:font-family-asian="Wingdings" style:font-family-complex="Wingdings"/>
    </style:style>
    <style:style style:family="text" style:name="T244">
      <style:text-properties fo:font-family="Symbol" style:font-family-asian="Symbol" style:font-family-complex="Symbol"/>
    </style:style>
    <style:style style:family="text" style:name="T245">
      <style:text-properties fo:font-family="Courier New" style:font-family-asian="Courier New" style:font-family-complex="Courier New"/>
    </style:style>
    <style:style style:family="text" style:name="T246">
      <style:text-properties fo:font-family="Wingdings" style:font-family-asian="Wingdings" style:font-family-complex="Wingdings"/>
    </style:style>
    <style:style style:family="text" style:name="T247">
      <style:text-properties fo:font-family="Symbol" style:font-family-asian="Symbol" style:font-family-complex="Symbol"/>
    </style:style>
    <style:style style:family="text" style:name="T248">
      <style:text-properties fo:font-family="Courier New" style:font-family-asian="Courier New" style:font-family-complex="Courier New"/>
    </style:style>
    <style:style style:family="text" style:name="T249">
      <style:text-properties fo:font-family="Wingdings" style:font-family-asian="Wingdings" style:font-family-complex="Wingdings"/>
    </style:style>
    <style:style style:family="text" style:name="T250">
      <style:text-properties fo:font-family="Symbol" style:font-family-asian="Symbol" style:font-family-complex="Symbol"/>
    </style:style>
    <style:style style:family="text" style:name="T251">
      <style:text-properties fo:font-family="Courier New" style:font-family-asian="Courier New" style:font-family-complex="Courier New"/>
    </style:style>
    <style:style style:family="text" style:name="T252">
      <style:text-properties fo:font-family="Wingdings" style:font-family-asian="Wingdings" style:font-family-complex="Wingdings"/>
    </style:style>
    <style:style style:family="text" style:name="T253">
      <style:text-properties fo:font-family="Symbol" style:font-family-asian="Symbol" style:font-family-complex="Symbol"/>
    </style:style>
    <style:style style:family="text" style:name="T254">
      <style:text-properties fo:font-family="Courier New" style:font-family-asian="Courier New" style:font-family-complex="Courier New"/>
    </style:style>
    <style:style style:family="text" style:name="T255">
      <style:text-properties fo:font-family="Wingdings" style:font-family-asian="Wingdings" style:font-family-complex="Wingdings"/>
    </style:style>
    <style:style style:family="text" style:name="T256">
      <style:text-properties fo:font-family="Symbol" style:font-family-asian="Symbol" style:font-family-complex="Symbol"/>
    </style:style>
    <style:style style:family="text" style:name="T257">
      <style:text-properties fo:font-family="Courier New" style:font-family-asian="Courier New" style:font-family-complex="Courier New"/>
    </style:style>
    <style:style style:family="text" style:name="T258">
      <style:text-properties fo:font-family="Wingdings" style:font-family-asian="Wingdings" style:font-family-complex="Wingdings"/>
    </style:style>
    <style:style style:family="text" style:name="T259">
      <style:text-properties fo:font-family="Symbol" style:font-family-asian="Symbol" style:font-family-complex="Symbol"/>
    </style:style>
    <style:style style:family="text" style:name="T260">
      <style:text-properties fo:font-family="Courier New" style:font-family-asian="Courier New" style:font-family-complex="Courier New"/>
    </style:style>
    <style:style style:family="text" style:name="T261">
      <style:text-properties fo:font-family="Wingdings" style:font-family-asian="Wingdings" style:font-family-complex="Wingdings"/>
    </style:style>
    <style:style style:family="text" style:name="T262">
      <style:text-properties fo:font-family="Symbol" style:font-family-asian="Symbol" style:font-family-complex="Symbol"/>
    </style:style>
    <style:style style:family="text" style:name="T263">
      <style:text-properties fo:font-family="Courier New" style:font-family-asian="Courier New" style:font-family-complex="Courier New"/>
    </style:style>
    <style:style style:family="text" style:name="T264">
      <style:text-properties fo:font-family="Wingdings" style:font-family-asian="Wingdings" style:font-family-complex="Wingdings"/>
    </style:style>
    <style:style style:family="text" style:name="T265">
      <style:text-properties fo:font-family="Symbol" style:font-family-asian="Symbol" style:font-family-complex="Symbol"/>
    </style:style>
    <style:style style:family="text" style:name="T266">
      <style:text-properties fo:font-family="Courier New" style:font-family-asian="Courier New" style:font-family-complex="Courier New"/>
    </style:style>
    <style:style style:family="text" style:name="T267">
      <style:text-properties fo:font-family="Wingdings" style:font-family-asian="Wingdings" style:font-family-complex="Wingdings"/>
    </style:style>
    <style:style style:family="text" style:name="T268">
      <style:text-properties fo:font-family="Symbol" style:font-family-asian="Symbol" style:font-family-complex="Symbol"/>
    </style:style>
    <style:style style:family="text" style:name="T269">
      <style:text-properties fo:font-family="Courier New" style:font-family-asian="Courier New" style:font-family-complex="Courier New"/>
    </style:style>
    <style:style style:family="text" style:name="T270">
      <style:text-properties fo:font-family="Wingdings" style:font-family-asian="Wingdings" style:font-family-complex="Wingdings"/>
    </style:style>
    <style:style style:family="text" style:name="T271">
      <style:text-properties fo:font-family="Symbol" style:font-family-asian="Symbol" style:font-family-complex="Symbol"/>
    </style:style>
    <style:style style:family="text" style:name="T272">
      <style:text-properties fo:font-family="Courier New" style:font-family-asian="Courier New" style:font-family-complex="Courier New"/>
    </style:style>
    <style:style style:family="text" style:name="T273">
      <style:text-properties fo:font-family="Wingdings" style:font-family-asian="Wingdings" style:font-family-complex="Wingdings"/>
    </style:style>
    <style:style style:family="text" style:name="T274">
      <style:text-properties fo:font-family="Symbol" style:font-family-asian="Symbol" style:font-family-complex="Symbol"/>
    </style:style>
    <style:style style:family="text" style:name="T275">
      <style:text-properties fo:font-family="Courier New" style:font-family-asian="Courier New" style:font-family-complex="Courier New"/>
    </style:style>
    <style:style style:family="text" style:name="T276">
      <style:text-properties fo:font-family="Wingdings" style:font-family-asian="Wingdings" style:font-family-complex="Wingdings"/>
    </style:style>
    <style:style style:family="text" style:name="T277">
      <style:text-properties fo:font-family="Symbol" style:font-family-asian="Symbol" style:font-family-complex="Symbol"/>
    </style:style>
    <style:style style:family="text" style:name="T278">
      <style:text-properties fo:font-family="Courier New" style:font-family-asian="Courier New" style:font-family-complex="Courier New"/>
    </style:style>
    <style:style style:family="text" style:name="T279">
      <style:text-properties fo:font-family="Wingdings" style:font-family-asian="Wingdings" style:font-family-complex="Wingdings"/>
    </style:style>
    <style:style style:family="text" style:name="T280">
      <style:text-properties fo:font-family="Symbol" style:font-family-asian="Symbol" style:font-family-complex="Symbol"/>
    </style:style>
    <style:style style:family="text" style:name="T281">
      <style:text-properties fo:font-family="Courier New" style:font-family-asian="Courier New" style:font-family-complex="Courier New"/>
    </style:style>
    <style:style style:family="text" style:name="T282">
      <style:text-properties fo:font-family="Wingdings" style:font-family-asian="Wingdings" style:font-family-complex="Wingdings"/>
    </style:style>
    <style:style style:family="text" style:name="T283">
      <style:text-properties fo:font-family="Symbol" style:font-family-asian="Symbol" style:font-family-complex="Symbol"/>
    </style:style>
    <style:style style:family="text" style:name="T284">
      <style:text-properties fo:font-family="Courier New" style:font-family-asian="Courier New" style:font-family-complex="Courier New"/>
    </style:style>
    <style:style style:family="text" style:name="T285">
      <style:text-properties fo:font-family="Wingdings" style:font-family-asian="Wingdings" style:font-family-complex="Wingdings"/>
    </style:style>
    <style:style style:family="text" style:name="T286">
      <style:text-properties fo:font-family="Symbol" style:font-family-asian="Symbol" style:font-family-complex="Symbol"/>
    </style:style>
    <style:style style:family="text" style:name="T287">
      <style:text-properties fo:font-family="Courier New" style:font-family-asian="Courier New" style:font-family-complex="Courier New"/>
    </style:style>
    <style:style style:family="text" style:name="T288">
      <style:text-properties fo:font-family="Wingdings" style:font-family-asian="Wingdings" style:font-family-complex="Wingdings"/>
    </style:style>
    <style:style style:family="text" style:name="T289">
      <style:text-properties fo:font-family="Symbol" style:font-family-asian="Symbol" style:font-family-complex="Symbol"/>
    </style:style>
    <style:style style:family="text" style:name="T290">
      <style:text-properties fo:font-family="Courier New" style:font-family-asian="Courier New" style:font-family-complex="Courier New"/>
    </style:style>
    <style:style style:family="text" style:name="T291">
      <style:text-properties fo:font-family="Wingdings" style:font-family-asian="Wingdings" style:font-family-complex="Wingdings"/>
    </style:style>
    <style:style style:family="text" style:name="T292">
      <style:text-properties fo:font-family="Symbol" style:font-family-asian="Symbol" style:font-family-complex="Symbol"/>
    </style:style>
    <style:style style:family="text" style:name="T293">
      <style:text-properties fo:font-family="Courier New" style:font-family-asian="Courier New" style:font-family-complex="Courier New"/>
    </style:style>
    <style:style style:family="text" style:name="T294">
      <style:text-properties fo:font-family="Wingdings" style:font-family-asian="Wingdings" style:font-family-complex="Wingdings"/>
    </style:style>
    <style:style style:family="text" style:name="T295">
      <style:text-properties fo:font-family="Symbol" style:font-family-asian="Symbol" style:font-family-complex="Symbol"/>
    </style:style>
    <style:style style:family="text" style:name="T296">
      <style:text-properties fo:font-family="Courier New" style:font-family-asian="Courier New" style:font-family-complex="Courier New"/>
    </style:style>
    <style:style style:family="text" style:name="T297">
      <style:text-properties fo:font-family="Wingdings" style:font-family-asian="Wingdings" style:font-family-complex="Wingdings"/>
    </style:style>
    <style:style style:family="text" style:name="T298">
      <style:text-properties fo:font-family="Symbol" style:font-family-asian="Symbol" style:font-family-complex="Symbol"/>
    </style:style>
    <style:style style:family="text" style:name="T299">
      <style:text-properties fo:font-family="Courier New" style:font-family-asian="Courier New" style:font-family-complex="Courier New"/>
    </style:style>
    <style:style style:family="text" style:name="T300">
      <style:text-properties fo:font-family="Wingdings" style:font-family-asian="Wingdings" style:font-family-complex="Wingdings"/>
    </style:style>
    <style:style style:family="text" style:name="T301">
      <style:text-properties fo:font-family="Symbol" style:font-family-asian="Symbol" style:font-family-complex="Symbol"/>
    </style:style>
    <style:style style:family="text" style:name="T302">
      <style:text-properties fo:font-family="Courier New" style:font-family-asian="Courier New" style:font-family-complex="Courier New"/>
    </style:style>
    <style:style style:family="text" style:name="T303">
      <style:text-properties fo:font-family="Wingdings" style:font-family-asian="Wingdings" style:font-family-complex="Wingdings"/>
    </style:style>
    <style:style style:family="text" style:name="T304">
      <style:text-properties fo:font-family="Symbol" style:font-family-asian="Symbol" style:font-family-complex="Symbol"/>
    </style:style>
    <style:style style:family="text" style:name="T305">
      <style:text-properties fo:font-family="Courier New" style:font-family-asian="Courier New" style:font-family-complex="Courier New"/>
    </style:style>
    <style:style style:family="text" style:name="T306">
      <style:text-properties fo:font-family="Wingdings" style:font-family-asian="Wingdings" style:font-family-complex="Wingdings"/>
    </style:style>
    <style:style style:family="text" style:name="T307">
      <style:text-properties fo:font-family="Symbol" style:font-family-asian="Symbol" style:font-family-complex="Symbol"/>
    </style:style>
    <style:style style:family="text" style:name="T308">
      <style:text-properties fo:font-family="Courier New" style:font-family-asian="Courier New" style:font-family-complex="Courier New"/>
    </style:style>
    <style:style style:family="text" style:name="T309">
      <style:text-properties fo:font-family="Wingdings" style:font-family-asian="Wingdings" style:font-family-complex="Wingdings"/>
    </style:style>
    <style:style style:family="text" style:name="T310">
      <style:text-properties fo:font-family="Symbol" style:font-family-asian="Symbol" style:font-family-complex="Symbol"/>
    </style:style>
    <style:style style:family="text" style:name="T311">
      <style:text-properties fo:font-family="Courier New" style:font-family-asian="Courier New" style:font-family-complex="Courier New"/>
    </style:style>
    <style:style style:family="text" style:name="T312">
      <style:text-properties fo:font-family="Wingdings" style:font-family-asian="Wingdings" style:font-family-complex="Wingdings"/>
    </style:style>
    <style:style style:family="text" style:name="T313">
      <style:text-properties fo:font-family="Symbol" style:font-family-asian="Symbol" style:font-family-complex="Symbol"/>
    </style:style>
    <style:style style:family="text" style:name="T314">
      <style:text-properties fo:font-family="Courier New" style:font-family-asian="Courier New" style:font-family-complex="Courier New"/>
    </style:style>
    <style:style style:family="text" style:name="T315">
      <style:text-properties fo:font-family="Wingdings" style:font-family-asian="Wingdings" style:font-family-complex="Wingdings"/>
    </style:style>
    <style:style style:family="text" style:name="T316">
      <style:text-properties fo:font-family="Symbol" style:font-family-asian="Symbol" style:font-family-complex="Symbol"/>
    </style:style>
    <style:style style:family="text" style:name="T317">
      <style:text-properties fo:font-family="Courier New" style:font-family-asian="Courier New" style:font-family-complex="Courier New"/>
    </style:style>
    <style:style style:family="text" style:name="T318">
      <style:text-properties fo:font-family="Wingdings" style:font-family-asian="Wingdings" style:font-family-complex="Wingdings"/>
    </style:style>
    <style:style style:family="text" style:name="T319">
      <style:text-properties fo:font-family="Symbol" style:font-family-asian="Symbol" style:font-family-complex="Symbol"/>
    </style:style>
    <style:style style:family="text" style:name="T320">
      <style:text-properties fo:font-family="Courier New" style:font-family-asian="Courier New" style:font-family-complex="Courier New"/>
    </style:style>
    <style:style style:family="text" style:name="T321">
      <style:text-properties fo:font-family="Wingdings" style:font-family-asian="Wingdings" style:font-family-complex="Wingdings"/>
    </style:style>
    <style:style style:family="text" style:name="T322">
      <style:text-properties fo:font-family="Symbol" style:font-family-asian="Symbol" style:font-family-complex="Symbol"/>
    </style:style>
    <style:style style:family="text" style:name="T323">
      <style:text-properties fo:font-family="Courier New" style:font-family-asian="Courier New" style:font-family-complex="Courier New"/>
    </style:style>
    <style:style style:family="text" style:name="T324">
      <style:text-properties fo:font-family="Wingdings" style:font-family-asian="Wingdings" style:font-family-complex="Wingdings"/>
    </style:style>
    <style:style style:family="text" style:name="T325">
      <style:text-properties fo:font-family="Symbol" style:font-family-asian="Symbol" style:font-family-complex="Symbol"/>
    </style:style>
    <style:style style:family="text" style:name="T326">
      <style:text-properties fo:font-family="Courier New" style:font-family-asian="Courier New" style:font-family-complex="Courier New"/>
    </style:style>
    <style:style style:family="text" style:name="T327">
      <style:text-properties fo:font-family="Wingdings" style:font-family-asian="Wingdings" style:font-family-complex="Wingdings"/>
    </style:style>
    <style:style style:family="text" style:name="T328">
      <style:text-properties fo:font-family="Symbol" style:font-family-asian="Symbol" style:font-family-complex="Symbol"/>
    </style:style>
    <style:style style:family="text" style:name="T329">
      <style:text-properties fo:font-family="Courier New" style:font-family-asian="Courier New" style:font-family-complex="Courier New"/>
    </style:style>
    <style:style style:family="text" style:name="T330">
      <style:text-properties fo:font-family="Wingdings" style:font-family-asian="Wingdings" style:font-family-complex="Wingdings"/>
    </style:style>
    <style:style style:family="text" style:name="T331">
      <style:text-properties fo:font-family="Symbol" style:font-family-asian="Symbol" style:font-family-complex="Symbol"/>
    </style:style>
    <style:style style:family="text" style:name="T332">
      <style:text-properties fo:font-family="Courier New" style:font-family-asian="Courier New" style:font-family-complex="Courier New"/>
    </style:style>
    <style:style style:family="text" style:name="T333">
      <style:text-properties fo:font-family="Wingdings" style:font-family-asian="Wingdings" style:font-family-complex="Wingdings"/>
    </style:style>
    <style:style style:family="text" style:name="T334">
      <style:text-properties fo:font-family="Symbol" style:font-family-asian="Symbol" style:font-family-complex="Symbol"/>
    </style:style>
    <style:style style:family="text" style:name="T335">
      <style:text-properties fo:font-family="Courier New" style:font-family-asian="Courier New" style:font-family-complex="Courier New"/>
    </style:style>
    <style:style style:family="text" style:name="T336">
      <style:text-properties fo:font-family="Wingdings" style:font-family-asian="Wingdings" style:font-family-complex="Wingdings"/>
    </style:style>
    <style:style style:family="text" style:name="T337">
      <style:text-properties fo:font-family="Symbol" style:font-family-asian="Symbol" style:font-family-complex="Symbol"/>
    </style:style>
    <style:style style:family="text" style:name="T338">
      <style:text-properties fo:font-family="Courier New" style:font-family-asian="Courier New" style:font-family-complex="Courier New"/>
    </style:style>
    <style:style style:family="text" style:name="T339">
      <style:text-properties fo:font-family="Wingdings" style:font-family-asian="Wingdings" style:font-family-complex="Wingdings"/>
    </style:style>
    <style:style style:family="text" style:name="T340">
      <style:text-properties fo:font-family="Symbol" style:font-family-asian="Symbol" style:font-family-complex="Symbol"/>
    </style:style>
    <style:style style:family="text" style:name="T341">
      <style:text-properties fo:font-family="Courier New" style:font-family-asian="Courier New" style:font-family-complex="Courier New"/>
    </style:style>
    <style:style style:family="text" style:name="T342">
      <style:text-properties fo:font-family="Wingdings" style:font-family-asian="Wingdings" style:font-family-complex="Wingdings"/>
    </style:style>
    <style:style style:family="text" style:name="T343">
      <style:text-properties fo:font-family="Symbol" style:font-family-asian="Symbol" style:font-family-complex="Symbol"/>
    </style:style>
    <style:style style:family="text" style:name="T344">
      <style:text-properties fo:font-family="Courier New" style:font-family-asian="Courier New" style:font-family-complex="Courier New"/>
    </style:style>
    <style:style style:family="text" style:name="T345">
      <style:text-properties fo:font-family="Wingdings" style:font-family-asian="Wingdings" style:font-family-complex="Wingdings"/>
    </style:style>
    <style:style style:family="text" style:name="T346">
      <style:text-properties fo:font-family="Symbol" style:font-family-asian="Symbol" style:font-family-complex="Symbol"/>
    </style:style>
    <style:style style:family="text" style:name="T347">
      <style:text-properties fo:font-family="Courier New" style:font-family-asian="Courier New" style:font-family-complex="Courier New"/>
    </style:style>
    <style:style style:family="text" style:name="T348">
      <style:text-properties fo:font-family="Wingdings" style:font-family-asian="Wingdings" style:font-family-complex="Wingdings"/>
    </style:style>
    <style:style style:family="text" style:name="T349">
      <style:text-properties fo:font-family="Symbol" style:font-family-asian="Symbol" style:font-family-complex="Symbol"/>
    </style:style>
    <style:style style:family="text" style:name="T350">
      <style:text-properties fo:font-family="Courier New" style:font-family-asian="Courier New" style:font-family-complex="Courier New"/>
    </style:style>
    <style:style style:family="text" style:name="T351">
      <style:text-properties fo:font-family="Wingdings" style:font-family-asian="Wingdings" style:font-family-complex="Wingdings"/>
    </style:style>
    <style:style style:family="text" style:name="T352">
      <style:text-properties fo:font-family="Symbol" style:font-family-asian="Symbol" style:font-family-complex="Symbol"/>
    </style:style>
    <style:style style:family="text" style:name="T353">
      <style:text-properties fo:font-family="Courier New" style:font-family-asian="Courier New" style:font-family-complex="Courier New"/>
    </style:style>
    <style:style style:family="text" style:name="T354">
      <style:text-properties fo:font-family="Wingdings" style:font-family-asian="Wingdings" style:font-family-complex="Wingdings"/>
    </style:style>
    <style:style style:family="text" style:name="T355">
      <style:text-properties fo:font-family="Symbol" style:font-family-asian="Symbol" style:font-family-complex="Symbol"/>
    </style:style>
    <style:style style:family="text" style:name="T356">
      <style:text-properties fo:font-family="Courier New" style:font-family-asian="Courier New" style:font-family-complex="Courier New"/>
    </style:style>
    <style:style style:family="text" style:name="T357">
      <style:text-properties fo:font-family="Wingdings" style:font-family-asian="Wingdings" style:font-family-complex="Wingdings"/>
    </style:style>
    <style:style style:family="text" style:name="T358">
      <style:text-properties fo:font-family="Symbol" style:font-family-asian="Symbol" style:font-family-complex="Symbol"/>
    </style:style>
    <style:style style:family="text" style:name="T359">
      <style:text-properties fo:font-family="Courier New" style:font-family-asian="Courier New" style:font-family-complex="Courier New"/>
    </style:style>
    <style:style style:family="text" style:name="T360">
      <style:text-properties fo:font-family="Wingdings" style:font-family-asian="Wingdings" style:font-family-complex="Wingdings"/>
    </style:style>
    <style:style style:family="text" style:name="T361">
      <style:text-properties fo:font-family="Symbol" style:font-family-asian="Symbol" style:font-family-complex="Symbol"/>
    </style:style>
    <style:style style:family="text" style:name="T362">
      <style:text-properties fo:font-family="Courier New" style:font-family-asian="Courier New" style:font-family-complex="Courier New"/>
    </style:style>
    <style:style style:family="text" style:name="T363">
      <style:text-properties fo:font-family="Wingdings" style:font-family-asian="Wingdings" style:font-family-complex="Wingdings"/>
    </style:style>
    <style:style style:family="text" style:name="T364">
      <style:text-properties fo:font-family="Symbol" style:font-family-asian="Symbol" style:font-family-complex="Symbol"/>
    </style:style>
    <style:style style:family="text" style:name="T365">
      <style:text-properties fo:font-family="Courier New" style:font-family-asian="Courier New" style:font-family-complex="Courier New"/>
    </style:style>
    <style:style style:family="text" style:name="T366">
      <style:text-properties fo:font-family="Wingdings" style:font-family-asian="Wingdings" style:font-family-complex="Wingdings"/>
    </style:style>
    <style:style style:family="text" style:name="T367">
      <style:text-properties fo:font-family="Symbol" style:font-family-asian="Symbol" style:font-family-complex="Symbol"/>
    </style:style>
    <style:style style:family="text" style:name="T368">
      <style:text-properties fo:font-family="Courier New" style:font-family-asian="Courier New" style:font-family-complex="Courier New"/>
    </style:style>
    <style:style style:family="text" style:name="T369">
      <style:text-properties fo:font-family="Wingdings" style:font-family-asian="Wingdings" style:font-family-complex="Wingdings"/>
    </style:style>
    <style:style style:family="text" style:name="T370">
      <style:text-properties fo:font-family="Symbol" style:font-family-asian="Symbol" style:font-family-complex="Symbol"/>
    </style:style>
    <style:style style:family="text" style:name="T371">
      <style:text-properties fo:font-family="Courier New" style:font-family-asian="Courier New" style:font-family-complex="Courier New"/>
    </style:style>
    <style:style style:family="text" style:name="T372">
      <style:text-properties fo:font-family="Wingdings" style:font-family-asian="Wingdings" style:font-family-complex="Wingdings"/>
    </style:style>
    <style:style style:family="text" style:name="T373">
      <style:text-properties fo:font-family="Symbol" style:font-family-asian="Symbol" style:font-family-complex="Symbol"/>
    </style:style>
    <style:style style:family="text" style:name="T374">
      <style:text-properties fo:font-family="Courier New" style:font-family-asian="Courier New" style:font-family-complex="Courier New"/>
    </style:style>
    <style:style style:family="text" style:name="T375">
      <style:text-properties fo:font-family="Wingdings" style:font-family-asian="Wingdings" style:font-family-complex="Wingdings"/>
    </style:style>
    <style:style style:family="text" style:name="T376">
      <style:text-properties fo:font-family="Symbol" style:font-family-asian="Symbol" style:font-family-complex="Symbol"/>
    </style:style>
    <style:style style:family="text" style:name="T377">
      <style:text-properties fo:font-family="Courier New" style:font-family-asian="Courier New" style:font-family-complex="Courier New"/>
    </style:style>
    <style:style style:family="text" style:name="T378">
      <style:text-properties fo:font-family="Wingdings" style:font-family-asian="Wingdings" style:font-family-complex="Wingdings"/>
    </style:style>
    <style:style style:family="text" style:name="T379">
      <style:text-properties fo:font-family="Symbol" style:font-family-asian="Symbol" style:font-family-complex="Symbol"/>
    </style:style>
    <style:style style:family="text" style:name="T380">
      <style:text-properties fo:font-family="Courier New" style:font-family-asian="Courier New" style:font-family-complex="Courier New"/>
    </style:style>
    <style:style style:family="text" style:name="T381">
      <style:text-properties fo:font-family="Wingdings" style:font-family-asian="Wingdings" style:font-family-complex="Wingdings"/>
    </style:style>
    <style:style style:family="text" style:name="T382">
      <style:text-properties fo:font-family="Symbol" style:font-family-asian="Symbol" style:font-family-complex="Symbol"/>
    </style:style>
    <style:style style:family="text" style:name="T383">
      <style:text-properties fo:font-family="Courier New" style:font-family-asian="Courier New" style:font-family-complex="Courier New"/>
    </style:style>
    <style:style style:family="text" style:name="T384">
      <style:text-properties fo:font-family="Wingdings" style:font-family-asian="Wingdings" style:font-family-complex="Wingdings"/>
    </style:style>
    <style:style style:family="text" style:name="T385">
      <style:text-properties fo:font-family="Symbol" style:font-family-asian="Symbol" style:font-family-complex="Symbol"/>
    </style:style>
    <style:style style:family="text" style:name="T386">
      <style:text-properties fo:font-family="Courier New" style:font-family-asian="Courier New" style:font-family-complex="Courier New"/>
    </style:style>
    <style:style style:family="text" style:name="T387">
      <style:text-properties fo:font-family="Wingdings" style:font-family-asian="Wingdings" style:font-family-complex="Wingdings"/>
    </style:style>
    <style:style style:family="text" style:name="T388">
      <style:text-properties fo:font-family="Symbol" style:font-family-asian="Symbol" style:font-family-complex="Symbol"/>
    </style:style>
    <style:style style:family="text" style:name="T389">
      <style:text-properties fo:font-family="Courier New" style:font-family-asian="Courier New" style:font-family-complex="Courier New"/>
    </style:style>
    <style:style style:family="text" style:name="T390">
      <style:text-properties fo:font-family="Wingdings" style:font-family-asian="Wingdings" style:font-family-complex="Wingdings"/>
    </style:style>
    <style:style style:family="text" style:name="T391">
      <style:text-properties fo:font-family="Symbol" style:font-family-asian="Symbol" style:font-family-complex="Symbol"/>
    </style:style>
    <style:style style:family="text" style:name="T392">
      <style:text-properties fo:font-family="Courier New" style:font-family-asian="Courier New" style:font-family-complex="Courier New"/>
    </style:style>
    <style:style style:family="text" style:name="T393">
      <style:text-properties fo:font-family="Wingdings" style:font-family-asian="Wingdings" style:font-family-complex="Wingdings"/>
    </style:style>
    <style:style style:family="text" style:name="T394">
      <style:text-properties fo:font-family="Symbol" style:font-family-asian="Symbol" style:font-family-complex="Symbol"/>
    </style:style>
    <style:style style:family="text" style:name="T395">
      <style:text-properties fo:font-family="Courier New" style:font-family-asian="Courier New" style:font-family-complex="Courier New"/>
    </style:style>
    <style:style style:family="text" style:name="T396">
      <style:text-properties fo:font-family="Wingdings" style:font-family-asian="Wingdings" style:font-family-complex="Wingdings"/>
    </style:style>
    <style:style style:family="text" style:name="T397">
      <style:text-properties fo:font-family="Symbol" style:font-family-asian="Symbol" style:font-family-complex="Symbol"/>
    </style:style>
    <style:style style:family="text" style:name="T398">
      <style:text-properties fo:font-family="Courier New" style:font-family-asian="Courier New" style:font-family-complex="Courier New"/>
    </style:style>
    <style:style style:family="text" style:name="T399">
      <style:text-properties fo:font-family="Wingdings" style:font-family-asian="Wingdings" style:font-family-complex="Wingdings"/>
    </style:style>
    <style:style style:family="text" style:name="T400">
      <style:text-properties fo:font-family="Symbol" style:font-family-asian="Symbol" style:font-family-complex="Symbol"/>
    </style:style>
    <style:style style:family="text" style:name="T401">
      <style:text-properties fo:font-family="Courier New" style:font-family-asian="Courier New" style:font-family-complex="Courier New"/>
    </style:style>
    <style:style style:family="text" style:name="T402">
      <style:text-properties fo:font-family="Wingdings" style:font-family-asian="Wingdings" style:font-family-complex="Wingdings"/>
    </style:style>
    <style:style style:family="text" style:name="T403">
      <style:text-properties fo:font-family="Symbol" style:font-family-asian="Symbol" style:font-family-complex="Symbol"/>
    </style:style>
    <style:style style:family="text" style:name="T404">
      <style:text-properties fo:font-family="Courier New" style:font-family-asian="Courier New" style:font-family-complex="Courier New"/>
    </style:style>
    <style:style style:family="text" style:name="T405">
      <style:text-properties fo:font-family="Wingdings" style:font-family-asian="Wingdings" style:font-family-complex="Wingdings"/>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style:style style:family="text" style:name="T415">
      <style:text-properties fo:font-family="Symbol" style:font-family-asian="Symbol" style:font-family-complex="Symbol"/>
    </style:style>
    <style:style style:family="text" style:name="T416">
      <style:text-properties fo:font-family="Courier New" style:font-family-asian="Courier New" style:font-family-complex="Courier New"/>
    </style:style>
    <style:style style:family="text" style:name="T417">
      <style:text-properties fo:font-family="Wingdings" style:font-family-asian="Wingdings" style:font-family-complex="Wingdings"/>
    </style:style>
    <style:style style:family="text" style:name="T418">
      <style:text-properties fo:font-family="Symbol" style:font-family-asian="Symbol" style:font-family-complex="Symbol"/>
    </style:style>
    <style:style style:family="text" style:name="T419">
      <style:text-properties fo:font-family="Courier New" style:font-family-asian="Courier New" style:font-family-complex="Courier New"/>
    </style:style>
    <style:style style:family="text" style:name="T420">
      <style:text-properties fo:font-family="Wingdings" style:font-family-asian="Wingdings" style:font-family-complex="Wingdings"/>
    </style:style>
    <style:style style:family="text" style:name="T421">
      <style:text-properties fo:font-family="Symbol" style:font-family-asian="Symbol" style:font-family-complex="Symbol"/>
    </style:style>
    <style:style style:family="text" style:name="T422">
      <style:text-properties fo:font-family="Courier New" style:font-family-asian="Courier New" style:font-family-complex="Courier New"/>
    </style:style>
    <style:style style:family="text" style:name="T423">
      <style:text-properties fo:font-family="Wingdings" style:font-family-asian="Wingdings" style:font-family-complex="Wingdings"/>
    </style:style>
    <style:style style:family="text" style:name="T424">
      <style:text-properties fo:font-family="Symbol" style:font-family-asian="Symbol" style:font-family-complex="Symbol"/>
    </style:style>
    <style:style style:family="text" style:name="T425">
      <style:text-properties fo:font-family="Courier New" style:font-family-asian="Courier New" style:font-family-complex="Courier New"/>
    </style:style>
    <style:style style:family="text" style:name="T426">
      <style:text-properties fo:font-family="Wingdings" style:font-family-asian="Wingdings" style:font-family-complex="Wingdings"/>
    </style:style>
    <style:style style:family="text" style:name="T427">
      <style:text-properties fo:font-family="Symbol" style:font-family-asian="Symbol" style:font-family-complex="Symbol"/>
    </style:style>
    <style:style style:family="text" style:name="T428">
      <style:text-properties fo:font-family="Courier New" style:font-family-asian="Courier New" style:font-family-complex="Courier New"/>
    </style:style>
    <style:style style:family="text" style:name="T429">
      <style:text-properties fo:font-family="Wingdings" style:font-family-asian="Wingdings" style:font-family-complex="Wingdings"/>
    </style:style>
    <style:style style:family="text" style:name="T430">
      <style:text-properties fo:font-family="Symbol" style:font-family-asian="Symbol" style:font-family-complex="Symbol"/>
    </style:style>
    <style:style style:family="text" style:name="T431">
      <style:text-properties fo:font-family="Courier New" style:font-family-asian="Courier New" style:font-family-complex="Courier New"/>
    </style:style>
    <style:style style:family="text" style:name="T432">
      <style:text-properties fo:font-family="Wingdings" style:font-family-asian="Wingdings" style:font-family-complex="Wingdings"/>
    </style:style>
    <style:style style:family="text" style:name="T433">
      <style:text-properties fo:font-family="Symbol" style:font-family-asian="Symbol" style:font-family-complex="Symbol"/>
    </style:style>
    <style:style style:family="text" style:name="T434">
      <style:text-properties fo:font-family="Courier New" style:font-family-asian="Courier New" style:font-family-complex="Courier New"/>
    </style:style>
    <style:style style:family="text" style:name="T435">
      <style:text-properties fo:font-family="Wingdings" style:font-family-asian="Wingdings" style:font-family-complex="Wingdings"/>
    </style:style>
    <style:style style:family="text" style:name="T436">
      <style:text-properties fo:font-family="Symbol" style:font-family-asian="Symbol" style:font-family-complex="Symbol"/>
    </style:style>
    <style:style style:family="text" style:name="T437">
      <style:text-properties fo:font-family="Courier New" style:font-family-asian="Courier New" style:font-family-complex="Courier New"/>
    </style:style>
    <style:style style:family="text" style:name="T438">
      <style:text-properties fo:font-family="Wingdings" style:font-family-asian="Wingdings" style:font-family-complex="Wingdings"/>
    </style:style>
    <style:style style:family="text" style:name="T439">
      <style:text-properties fo:font-family="Symbol" style:font-family-asian="Symbol" style:font-family-complex="Symbol"/>
    </style:style>
    <style:style style:family="text" style:name="T440">
      <style:text-properties fo:font-family="Courier New" style:font-family-asian="Courier New" style:font-family-complex="Courier New"/>
    </style:style>
    <style:style style:family="text" style:name="T441">
      <style:text-properties fo:font-family="Wingdings" style:font-family-asian="Wingdings" style:font-family-complex="Wingdings"/>
    </style:style>
    <style:style style:family="text" style:name="T442">
      <style:text-properties fo:font-family="Symbol" style:font-family-asian="Symbol" style:font-family-complex="Symbol"/>
    </style:style>
    <style:style style:family="text" style:name="T443">
      <style:text-properties fo:font-family="Courier New" style:font-family-asian="Courier New" style:font-family-complex="Courier New"/>
    </style:style>
    <style:style style:family="text" style:name="T444">
      <style:text-properties fo:font-family="Wingdings" style:font-family-asian="Wingdings" style:font-family-complex="Wingdings"/>
    </style:style>
    <style:style style:family="text" style:name="T445">
      <style:text-properties fo:font-family="Symbol" style:font-family-asian="Symbol" style:font-family-complex="Symbol"/>
    </style:style>
    <style:style style:family="text" style:name="T446">
      <style:text-properties fo:font-family="Courier New" style:font-family-asian="Courier New" style:font-family-complex="Courier New"/>
    </style:style>
    <style:style style:family="text" style:name="T447">
      <style:text-properties fo:font-family="Wingdings" style:font-family-asian="Wingdings" style:font-family-complex="Wingdings"/>
    </style:style>
    <style:style style:family="text" style:name="T448">
      <style:text-properties fo:font-family="Symbol" style:font-family-asian="Symbol" style:font-family-complex="Symbol"/>
    </style:style>
    <style:style style:family="text" style:name="T449">
      <style:text-properties fo:font-family="Courier New" style:font-family-asian="Courier New" style:font-family-complex="Courier New"/>
    </style:style>
    <style:style style:family="text" style:name="T450">
      <style:text-properties fo:font-family="Wingdings" style:font-family-asian="Wingdings" style:font-family-complex="Wingdings"/>
    </style:style>
    <style:style style:family="text" style:name="T451">
      <style:text-properties fo:font-family="Symbol" style:font-family-asian="Symbol" style:font-family-complex="Symbol"/>
    </style:style>
    <style:style style:family="text" style:name="T452">
      <style:text-properties fo:font-family="Courier New" style:font-family-asian="Courier New" style:font-family-complex="Courier New"/>
    </style:style>
    <style:style style:family="text" style:name="T453">
      <style:text-properties fo:font-family="Wingdings" style:font-family-asian="Wingdings" style:font-family-complex="Wingdings"/>
    </style:style>
    <style:style style:family="text" style:name="T454">
      <style:text-properties fo:font-family="Symbol" style:font-family-asian="Symbol" style:font-family-complex="Symbol"/>
    </style:style>
    <style:style style:family="text" style:name="T455">
      <style:text-properties fo:font-family="Courier New" style:font-family-asian="Courier New" style:font-family-complex="Courier New"/>
    </style:style>
    <style:style style:family="text" style:name="T456">
      <style:text-properties fo:font-family="Wingdings" style:font-family-asian="Wingdings" style:font-family-complex="Wingdings"/>
    </style:style>
    <style:style style:family="text" style:name="T457">
      <style:text-properties fo:font-family="Symbol" style:font-family-asian="Symbol" style:font-family-complex="Symbol"/>
    </style:style>
    <style:style style:family="text" style:name="T458">
      <style:text-properties fo:font-family="Courier New" style:font-family-asian="Courier New" style:font-family-complex="Courier New"/>
    </style:style>
    <style:style style:family="text" style:name="T459">
      <style:text-properties fo:font-family="Wingdings" style:font-family-asian="Wingdings" style:font-family-complex="Wingdings"/>
    </style:style>
    <style:style style:family="text" style:name="T460">
      <style:text-properties fo:font-family="Symbol" style:font-family-asian="Symbol" style:font-family-complex="Symbol"/>
    </style:style>
    <style:style style:family="text" style:name="T461">
      <style:text-properties fo:font-family="Courier New" style:font-family-asian="Courier New" style:font-family-complex="Courier New"/>
    </style:style>
    <style:style style:family="text" style:name="T462">
      <style:text-properties fo:font-family="Wingdings" style:font-family-asian="Wingdings" style:font-family-complex="Wingdings"/>
    </style:style>
    <style:style style:family="text" style:name="T463">
      <style:text-properties fo:font-family="Symbol" style:font-family-asian="Symbol" style:font-family-complex="Symbol"/>
    </style:style>
    <style:style style:family="text" style:name="T464">
      <style:text-properties fo:font-family="Courier New" style:font-family-asian="Courier New" style:font-family-complex="Courier New"/>
    </style:style>
    <style:style style:family="text" style:name="T465">
      <style:text-properties fo:font-family="Wingdings" style:font-family-asian="Wingdings" style:font-family-complex="Wingdings"/>
    </style:style>
    <style:style style:family="text" style:name="T466">
      <style:text-properties fo:font-family="Symbol" style:font-family-asian="Symbol" style:font-family-complex="Symbol"/>
    </style:style>
    <style:style style:family="text" style:name="T467">
      <style:text-properties fo:font-family="Courier New" style:font-family-asian="Courier New" style:font-family-complex="Courier New"/>
    </style:style>
    <style:style style:family="text" style:name="T468">
      <style:text-properties fo:font-family="Wingdings" style:font-family-asian="Wingdings" style:font-family-complex="Wingdings"/>
    </style:style>
    <style:style style:family="text" style:name="T469">
      <style:text-properties fo:font-family="Symbol" style:font-family-asian="Symbol" style:font-family-complex="Symbol"/>
    </style:style>
    <style:style style:family="text" style:name="T470">
      <style:text-properties fo:font-family="Courier New" style:font-family-asian="Courier New" style:font-family-complex="Courier New"/>
    </style:style>
    <style:style style:family="text" style:name="T471">
      <style:text-properties fo:font-family="Wingdings" style:font-family-asian="Wingdings" style:font-family-complex="Wingdings"/>
    </style:style>
    <style:style style:family="text" style:name="T472">
      <style:text-properties fo:font-family="Symbol" style:font-family-asian="Symbol" style:font-family-complex="Symbol"/>
    </style:style>
    <style:style style:family="text" style:name="T473">
      <style:text-properties fo:font-family="Courier New" style:font-family-asian="Courier New" style:font-family-complex="Courier New"/>
    </style:style>
    <style:style style:family="text" style:name="T474">
      <style:text-properties fo:font-family="Wingdings" style:font-family-asian="Wingdings" style:font-family-complex="Wingdings"/>
    </style:style>
    <style:style style:family="text" style:name="T475">
      <style:text-properties fo:font-family="Symbol" style:font-family-asian="Symbol" style:font-family-complex="Symbol"/>
    </style:style>
    <style:style style:family="text" style:name="T476">
      <style:text-properties fo:font-family="Courier New" style:font-family-asian="Courier New" style:font-family-complex="Courier New"/>
    </style:style>
    <style:style style:family="text" style:name="T477">
      <style:text-properties fo:font-family="Wingdings" style:font-family-asian="Wingdings" style:font-family-complex="Wingdings"/>
    </style:style>
    <style:style style:family="text" style:name="T478">
      <style:text-properties fo:font-family="Symbol" style:font-family-asian="Symbol" style:font-family-complex="Symbol"/>
    </style:style>
    <style:style style:family="text" style:name="T479">
      <style:text-properties fo:font-family="Courier New" style:font-family-asian="Courier New" style:font-family-complex="Courier New"/>
    </style:style>
    <style:style style:family="text" style:name="T480">
      <style:text-properties fo:font-family="Wingdings" style:font-family-asian="Wingdings" style:font-family-complex="Wingdings"/>
    </style:style>
    <style:style style:family="text" style:name="T481">
      <style:text-properties fo:font-family="Symbol" style:font-family-asian="Symbol" style:font-family-complex="Symbol"/>
    </style:style>
    <style:style style:family="text" style:name="T482">
      <style:text-properties fo:font-family="Courier New" style:font-family-asian="Courier New" style:font-family-complex="Courier New"/>
    </style:style>
    <style:style style:family="text" style:name="T483">
      <style:text-properties fo:font-family="Wingdings" style:font-family-asian="Wingdings" style:font-family-complex="Wingdings"/>
    </style:style>
    <style:style style:family="text" style:name="T484">
      <style:text-properties fo:font-family="Symbol" style:font-family-asian="Symbol" style:font-family-complex="Symbol"/>
    </style:style>
    <style:style style:family="text" style:name="T485">
      <style:text-properties fo:font-family="Courier New" style:font-family-asian="Courier New" style:font-family-complex="Courier New"/>
    </style:style>
    <style:style style:family="text" style:name="T486">
      <style:text-properties fo:font-family="Wingdings" style:font-family-asian="Wingdings" style:font-family-complex="Wingdings"/>
    </style:style>
    <style:style style:family="text" style:name="T487">
      <style:text-properties fo:font-family="Symbol" style:font-family-asian="Symbol" style:font-family-complex="Symbol"/>
    </style:style>
    <style:style style:family="text" style:name="T488">
      <style:text-properties fo:font-family="Courier New" style:font-family-asian="Courier New" style:font-family-complex="Courier New"/>
    </style:style>
    <style:style style:family="text" style:name="T489">
      <style:text-properties fo:font-family="Wingdings" style:font-family-asian="Wingdings" style:font-family-complex="Wingdings"/>
    </style:style>
    <style:style style:family="text" style:name="T490">
      <style:text-properties fo:font-family="Symbol" style:font-family-asian="Symbol" style:font-family-complex="Symbol"/>
    </style:style>
    <style:style style:family="text" style:name="T491">
      <style:text-properties fo:font-family="Courier New" style:font-family-asian="Courier New" style:font-family-complex="Courier New"/>
    </style:style>
    <style:style style:family="text" style:name="T492">
      <style:text-properties fo:font-family="Wingdings" style:font-family-asian="Wingdings" style:font-family-complex="Wingdings"/>
    </style:style>
    <style:style style:family="text" style:name="T493">
      <style:text-properties fo:font-family="Symbol" style:font-family-asian="Symbol" style:font-family-complex="Symbol"/>
    </style:style>
    <style:style style:family="text" style:name="T494">
      <style:text-properties fo:font-family="Courier New" style:font-family-asian="Courier New" style:font-family-complex="Courier New"/>
    </style:style>
    <style:style style:family="text" style:name="T495">
      <style:text-properties fo:font-family="Wingdings" style:font-family-asian="Wingdings" style:font-family-complex="Wingdings"/>
    </style:style>
    <style:style style:family="text" style:name="T496">
      <style:text-properties fo:font-family="Symbol" style:font-family-asian="Symbol" style:font-family-complex="Symbol"/>
    </style:style>
    <style:style style:family="text" style:name="T497">
      <style:text-properties fo:font-family="Courier New" style:font-family-asian="Courier New" style:font-family-complex="Courier New"/>
    </style:style>
    <style:style style:family="text" style:name="T498">
      <style:text-properties fo:font-family="Wingdings" style:font-family-asian="Wingdings" style:font-family-complex="Wingdings"/>
    </style:style>
    <style:style style:family="text" style:name="T499">
      <style:text-properties fo:font-family="Symbol" style:font-family-asian="Symbol" style:font-family-complex="Symbol"/>
    </style:style>
    <style:style style:family="text" style:name="T500">
      <style:text-properties fo:font-family="Courier New" style:font-family-asian="Courier New" style:font-family-complex="Courier New"/>
    </style:style>
    <style:style style:family="text" style:name="T501">
      <style:text-properties fo:font-family="Wingdings" style:font-family-asian="Wingdings" style:font-family-complex="Wingdings"/>
    </style:style>
    <style:style style:family="text" style:name="T502">
      <style:text-properties fo:font-family="Symbol" style:font-family-asian="Symbol" style:font-family-complex="Symbol"/>
    </style:style>
    <style:style style:family="text" style:name="T503">
      <style:text-properties fo:font-family="Courier New" style:font-family-asian="Courier New" style:font-family-complex="Courier New"/>
    </style:style>
    <style:style style:family="text" style:name="T504">
      <style:text-properties fo:font-family="Wingdings" style:font-family-asian="Wingdings" style:font-family-complex="Wingdings"/>
    </style:style>
    <style:style style:family="text" style:name="T505">
      <style:text-properties fo:font-family="Symbol" style:font-family-asian="Symbol" style:font-family-complex="Symbol"/>
    </style:style>
    <style:style style:family="text" style:name="T506">
      <style:text-properties fo:font-family="Courier New" style:font-family-asian="Courier New" style:font-family-complex="Courier New"/>
    </style:style>
    <style:style style:family="text" style:name="T507">
      <style:text-properties fo:font-family="Wingdings" style:font-family-asian="Wingdings" style:font-family-complex="Wingdings"/>
    </style:style>
    <style:style style:family="text" style:name="T508">
      <style:text-properties fo:font-family="Symbol" style:font-family-asian="Symbol" style:font-family-complex="Symbol"/>
    </style:style>
    <style:style style:family="text" style:name="T509">
      <style:text-properties fo:font-family="Courier New" style:font-family-asian="Courier New" style:font-family-complex="Courier New"/>
    </style:style>
    <style:style style:family="text" style:name="T510">
      <style:text-properties fo:font-family="Wingdings" style:font-family-asian="Wingdings" style:font-family-complex="Wingdings"/>
    </style:style>
    <style:style style:family="text" style:name="T511">
      <style:text-properties fo:font-family="Symbol" style:font-family-asian="Symbol" style:font-family-complex="Symbol"/>
    </style:style>
    <style:style style:family="text" style:name="T512">
      <style:text-properties fo:font-family="Courier New" style:font-family-asian="Courier New" style:font-family-complex="Courier New"/>
    </style:style>
    <style:style style:family="text" style:name="T513">
      <style:text-properties fo:font-family="Wingdings" style:font-family-asian="Wingdings" style:font-family-complex="Wingdings"/>
    </style:style>
    <style:style style:family="text" style:name="T514">
      <style:text-properties fo:font-family="Symbol" style:font-family-asian="Symbol" style:font-family-complex="Symbol"/>
    </style:style>
    <style:style style:family="text" style:name="T515">
      <style:text-properties fo:font-family="Courier New" style:font-family-asian="Courier New" style:font-family-complex="Courier New"/>
    </style:style>
    <style:style style:family="text" style:name="T516">
      <style:text-properties fo:font-family="Wingdings" style:font-family-asian="Wingdings" style:font-family-complex="Wingdings"/>
    </style:style>
    <style:style style:family="text" style:name="T517">
      <style:text-properties fo:font-family="Symbol" style:font-family-asian="Symbol" style:font-family-complex="Symbol"/>
    </style:style>
    <style:style style:family="text" style:name="T518">
      <style:text-properties fo:font-family="Courier New" style:font-family-asian="Courier New" style:font-family-complex="Courier New"/>
    </style:style>
    <style:style style:family="text" style:name="T519">
      <style:text-properties fo:font-family="Wingdings" style:font-family-asian="Wingdings" style:font-family-complex="Wingdings"/>
    </style:style>
    <style:style style:family="text" style:name="T520">
      <style:text-properties fo:font-family="Symbol" style:font-family-asian="Symbol" style:font-family-complex="Symbol"/>
    </style:style>
    <style:style style:family="text" style:name="T521">
      <style:text-properties fo:font-family="Courier New" style:font-family-asian="Courier New" style:font-family-complex="Courier New"/>
    </style:style>
    <style:style style:family="text" style:name="T522">
      <style:text-properties fo:font-family="Wingdings" style:font-family-asian="Wingdings" style:font-family-complex="Wingdings"/>
    </style:style>
    <style:style style:family="text" style:name="T523">
      <style:text-properties fo:font-family="Symbol" style:font-family-asian="Symbol" style:font-family-complex="Symbol"/>
    </style:style>
    <style:style style:family="text" style:name="T524">
      <style:text-properties fo:font-family="Courier New" style:font-family-asian="Courier New" style:font-family-complex="Courier New"/>
    </style:style>
    <style:style style:family="text" style:name="T525">
      <style:text-properties fo:font-family="Wingdings" style:font-family-asian="Wingdings" style:font-family-complex="Wingdings"/>
    </style:style>
    <style:style style:family="text" style:name="T526">
      <style:text-properties fo:font-family="Symbol" style:font-family-asian="Symbol" style:font-family-complex="Symbol"/>
    </style:style>
    <style:style style:family="text" style:name="T527">
      <style:text-properties fo:font-family="Courier New" style:font-family-asian="Courier New" style:font-family-complex="Courier New"/>
    </style:style>
    <style:style style:family="text" style:name="T528">
      <style:text-properties fo:font-family="Wingdings" style:font-family-asian="Wingdings" style:font-family-complex="Wingdings"/>
    </style:style>
    <style:style style:family="text" style:name="T529">
      <style:text-properties fo:font-family="Symbol" style:font-family-asian="Symbol" style:font-family-complex="Symbol"/>
    </style:style>
    <style:style style:family="text" style:name="T530">
      <style:text-properties fo:font-family="Courier New" style:font-family-asian="Courier New" style:font-family-complex="Courier New"/>
    </style:style>
    <style:style style:family="text" style:name="T531">
      <style:text-properties fo:font-family="Wingdings" style:font-family-asian="Wingdings" style:font-family-complex="Wingdings"/>
    </style:style>
    <style:style style:family="text" style:name="T532">
      <style:text-properties fo:font-family="Symbol" style:font-family-asian="Symbol" style:font-family-complex="Symbol"/>
    </style:style>
    <style:style style:family="text" style:name="T533">
      <style:text-properties fo:font-family="Courier New" style:font-family-asian="Courier New" style:font-family-complex="Courier New"/>
    </style:style>
    <style:style style:family="text" style:name="T534">
      <style:text-properties fo:font-family="Wingdings" style:font-family-asian="Wingdings" style:font-family-complex="Wingdings"/>
    </style:style>
    <style:style style:family="text" style:name="T535">
      <style:text-properties fo:font-family="Symbol" style:font-family-asian="Symbol" style:font-family-complex="Symbol"/>
    </style:style>
    <style:style style:family="text" style:name="T536">
      <style:text-properties fo:font-family="Courier New" style:font-family-asian="Courier New" style:font-family-complex="Courier New"/>
    </style:style>
    <style:style style:family="text" style:name="T537">
      <style:text-properties fo:font-family="Wingdings" style:font-family-asian="Wingdings" style:font-family-complex="Wingdings"/>
    </style:style>
    <style:style style:family="text" style:name="T538">
      <style:text-properties fo:font-family="Symbol" style:font-family-asian="Symbol" style:font-family-complex="Symbol"/>
    </style:style>
    <style:style style:family="text" style:name="T539">
      <style:text-properties fo:font-family="Courier New" style:font-family-asian="Courier New" style:font-family-complex="Courier New"/>
    </style:style>
    <style:style style:family="text" style:name="T540">
      <style:text-properties fo:font-family="Wingdings" style:font-family-asian="Wingdings" style:font-family-complex="Wingdings"/>
    </style:style>
    <style:style style:family="text" style:name="T541">
      <style:text-properties fo:font-family="Symbol" style:font-family-asian="Symbol" style:font-family-complex="Symbol"/>
    </style:style>
    <style:style style:family="text" style:name="T542">
      <style:text-properties fo:font-family="Courier New" style:font-family-asian="Courier New" style:font-family-complex="Courier New"/>
    </style:style>
    <style:style style:family="text" style:name="T543">
      <style:text-properties fo:font-family="Wingdings" style:font-family-asian="Wingdings" style:font-family-complex="Wingdings"/>
    </style:style>
    <style:style style:family="text" style:name="T544">
      <style:text-properties fo:font-family="Symbol" style:font-family-asian="Symbol" style:font-family-complex="Symbol"/>
    </style:style>
    <style:style style:family="text" style:name="T545">
      <style:text-properties fo:font-family="Courier New" style:font-family-asian="Courier New" style:font-family-complex="Courier New"/>
    </style:style>
    <style:style style:family="text" style:name="T546">
      <style:text-properties fo:font-family="Wingdings" style:font-family-asian="Wingdings" style:font-family-complex="Wingdings"/>
    </style:style>
    <style:style style:family="text" style:name="T547">
      <style:text-properties fo:font-family="Symbol" style:font-family-asian="Symbol" style:font-family-complex="Symbol"/>
    </style:style>
    <style:style style:family="text" style:name="T548">
      <style:text-properties fo:font-family="Courier New" style:font-family-asian="Courier New" style:font-family-complex="Courier New"/>
    </style:style>
    <style:style style:family="text" style:name="T549">
      <style:text-properties fo:font-family="Wingdings" style:font-family-asian="Wingdings" style:font-family-complex="Wingdings"/>
    </style:style>
    <style:style style:family="text" style:name="T550">
      <style:text-properties fo:font-family="Symbol" style:font-family-asian="Symbol" style:font-family-complex="Symbol"/>
    </style:style>
    <style:style style:family="text" style:name="T551">
      <style:text-properties fo:font-family="Courier New" style:font-family-asian="Courier New" style:font-family-complex="Courier New"/>
    </style:style>
    <style:style style:family="text" style:name="T552">
      <style:text-properties fo:font-family="Wingdings" style:font-family-asian="Wingdings" style:font-family-complex="Wingdings"/>
    </style:style>
    <style:style style:family="text" style:name="T553">
      <style:text-properties fo:font-family="Symbol" style:font-family-asian="Symbol" style:font-family-complex="Symbol"/>
    </style:style>
    <style:style style:family="text" style:name="T554">
      <style:text-properties fo:font-family="Courier New" style:font-family-asian="Courier New" style:font-family-complex="Courier New"/>
    </style:style>
    <style:style style:family="text" style:name="T555">
      <style:text-properties fo:font-family="Wingdings" style:font-family-asian="Wingdings" style:font-family-complex="Wingdings"/>
    </style:style>
    <style:style style:family="text" style:name="T556">
      <style:text-properties fo:font-family="Symbol" style:font-family-asian="Symbol" style:font-family-complex="Symbol"/>
    </style:style>
    <style:style style:family="text" style:name="T557">
      <style:text-properties fo:font-family="Courier New" style:font-family-asian="Courier New" style:font-family-complex="Courier New"/>
    </style:style>
    <style:style style:family="text" style:name="T558">
      <style:text-properties fo:font-family="Wingdings" style:font-family-asian="Wingdings" style:font-family-complex="Wingdings"/>
    </style:style>
    <style:style style:family="text" style:name="T559">
      <style:text-properties fo:font-family="Symbol" style:font-family-asian="Symbol" style:font-family-complex="Symbol"/>
    </style:style>
    <style:style style:family="text" style:name="T560">
      <style:text-properties fo:font-family="Courier New" style:font-family-asian="Courier New" style:font-family-complex="Courier New"/>
    </style:style>
    <style:style style:family="text" style:name="T561">
      <style:text-properties fo:font-family="Wingdings" style:font-family-asian="Wingdings" style:font-family-complex="Wingdings"/>
    </style:style>
    <style:style style:family="text" style:name="T562">
      <style:text-properties fo:font-family="Symbol" style:font-family-asian="Symbol" style:font-family-complex="Symbol"/>
    </style:style>
    <style:style style:family="text" style:name="T563">
      <style:text-properties fo:font-family="Courier New" style:font-family-asian="Courier New" style:font-family-complex="Courier New"/>
    </style:style>
    <style:style style:family="text" style:name="T564">
      <style:text-properties fo:font-family="Wingdings" style:font-family-asian="Wingdings" style:font-family-complex="Wingdings"/>
    </style:style>
    <style:style style:family="text" style:name="T565">
      <style:text-properties fo:font-family="Symbol" style:font-family-asian="Symbol" style:font-family-complex="Symbol"/>
    </style:style>
    <style:style style:family="text" style:name="T566">
      <style:text-properties fo:font-family="Courier New" style:font-family-asian="Courier New" style:font-family-complex="Courier New"/>
    </style:style>
    <style:style style:family="text" style:name="T567">
      <style:text-properties fo:font-family="Wingdings" style:font-family-asian="Wingdings" style:font-family-complex="Wingdings"/>
    </style:style>
    <style:style style:family="text" style:name="T568">
      <style:text-properties fo:font-family="Symbol" style:font-family-asian="Symbol" style:font-family-complex="Symbol"/>
    </style:style>
    <style:style style:family="text" style:name="T569">
      <style:text-properties fo:font-family="Courier New" style:font-family-asian="Courier New" style:font-family-complex="Courier New"/>
    </style:style>
    <style:style style:family="text" style:name="T570">
      <style:text-properties fo:font-family="Wingdings" style:font-family-asian="Wingdings" style:font-family-complex="Wingdings"/>
    </style:style>
    <style:style style:family="text" style:name="T571">
      <style:text-properties fo:font-family="Symbol" style:font-family-asian="Symbol" style:font-family-complex="Symbol"/>
    </style:style>
    <style:style style:family="text" style:name="T572">
      <style:text-properties fo:font-family="Courier New" style:font-family-asian="Courier New" style:font-family-complex="Courier New"/>
    </style:style>
    <style:style style:family="text" style:name="T573">
      <style:text-properties fo:font-family="Wingdings" style:font-family-asian="Wingdings" style:font-family-complex="Wingdings"/>
    </style:style>
    <style:style style:family="text" style:name="T574">
      <style:text-properties fo:font-family="Symbol" style:font-family-asian="Symbol" style:font-family-complex="Symbol"/>
    </style:style>
    <style:style style:family="text" style:name="T575">
      <style:text-properties fo:font-family="Courier New" style:font-family-asian="Courier New" style:font-family-complex="Courier New"/>
    </style:style>
    <style:style style:family="text" style:name="T576">
      <style:text-properties fo:font-family="Wingdings" style:font-family-asian="Wingdings" style:font-family-complex="Wingdings"/>
    </style:style>
    <style:style style:family="text" style:name="T577">
      <style:text-properties fo:font-family="Symbol" style:font-family-asian="Symbol" style:font-family-complex="Symbol"/>
    </style:style>
    <style:style style:family="text" style:name="T578">
      <style:text-properties fo:font-family="Courier New" style:font-family-asian="Courier New" style:font-family-complex="Courier New"/>
    </style:style>
    <style:style style:family="text" style:name="T579">
      <style:text-properties fo:font-family="Wingdings" style:font-family-asian="Wingdings" style:font-family-complex="Wingdings"/>
    </style:style>
    <style:style style:family="text" style:name="T580">
      <style:text-properties fo:font-family="Symbol" style:font-family-asian="Symbol" style:font-family-complex="Symbol"/>
    </style:style>
    <style:style style:family="text" style:name="T581">
      <style:text-properties fo:font-family="Courier New" style:font-family-asian="Courier New" style:font-family-complex="Courier New"/>
    </style:style>
    <style:style style:family="text" style:name="T582">
      <style:text-properties fo:font-family="Wingdings" style:font-family-asian="Wingdings" style:font-family-complex="Wingdings"/>
    </style:style>
    <style:style style:family="text" style:name="T583">
      <style:text-properties fo:font-family="Symbol" style:font-family-asian="Symbol" style:font-family-complex="Symbol"/>
    </style:style>
    <style:style style:family="text" style:name="T584">
      <style:text-properties fo:font-family="Courier New" style:font-family-asian="Courier New" style:font-family-complex="Courier New"/>
    </style:style>
    <style:style style:family="text" style:name="T585">
      <style:text-properties fo:font-family="Wingdings" style:font-family-asian="Wingdings" style:font-family-complex="Wingdings"/>
    </style:style>
    <style:style style:family="text" style:name="T586">
      <style:text-properties fo:font-family="Symbol" style:font-family-asian="Symbol" style:font-family-complex="Symbol"/>
    </style:style>
    <style:style style:family="text" style:name="T587">
      <style:text-properties fo:font-family="Courier New" style:font-family-asian="Courier New" style:font-family-complex="Courier New"/>
    </style:style>
    <style:style style:family="text" style:name="T588">
      <style:text-properties fo:font-family="Wingdings" style:font-family-asian="Wingdings" style:font-family-complex="Wingdings"/>
    </style:style>
    <style:style style:family="text" style:name="T589">
      <style:text-properties fo:font-family="Symbol" style:font-family-asian="Symbol" style:font-family-complex="Symbol"/>
    </style:style>
    <style:style style:family="text" style:name="T590">
      <style:text-properties fo:font-family="Courier New" style:font-family-asian="Courier New" style:font-family-complex="Courier New"/>
    </style:style>
    <style:style style:family="text" style:name="T591">
      <style:text-properties fo:font-family="Wingdings" style:font-family-asian="Wingdings" style:font-family-complex="Wingdings"/>
    </style:style>
    <style:style style:family="text" style:name="T592">
      <style:text-properties fo:font-family="Symbol" style:font-family-asian="Symbol" style:font-family-complex="Symbol"/>
    </style:style>
    <style:style style:family="text" style:name="T593">
      <style:text-properties fo:font-family="Courier New" style:font-family-asian="Courier New" style:font-family-complex="Courier New"/>
    </style:style>
    <style:style style:family="text" style:name="T594">
      <style:text-properties fo:font-family="Wingdings" style:font-family-asian="Wingdings" style:font-family-complex="Wingdings"/>
    </style:style>
    <style:style style:family="text" style:name="T595">
      <style:text-properties fo:font-family="Symbol" style:font-family-asian="Symbol" style:font-family-complex="Symbol"/>
    </style:style>
    <style:style style:family="text" style:name="T596">
      <style:text-properties fo:font-family="Courier New" style:font-family-asian="Courier New" style:font-family-complex="Courier New"/>
    </style:style>
    <style:style style:family="text" style:name="T597">
      <style:text-properties fo:font-family="Wingdings" style:font-family-asian="Wingdings" style:font-family-complex="Wingdings"/>
    </style:style>
    <style:style style:family="text" style:name="T598">
      <style:text-properties fo:font-family="Symbol" style:font-family-asian="Symbol" style:font-family-complex="Symbol"/>
    </style:style>
    <style:style style:family="text" style:name="T599">
      <style:text-properties fo:font-family="Courier New" style:font-family-asian="Courier New" style:font-family-complex="Courier New"/>
    </style:style>
    <style:style style:family="text" style:name="T600">
      <style:text-properties fo:font-family="Wingdings" style:font-family-asian="Wingdings" style:font-family-complex="Wingdings"/>
    </style:style>
    <style:style style:family="text" style:name="T601">
      <style:text-properties fo:font-family="Symbol" style:font-family-asian="Symbol" style:font-family-complex="Symbol"/>
    </style:style>
    <style:style style:family="text" style:name="T602">
      <style:text-properties fo:font-family="Courier New" style:font-family-asian="Courier New" style:font-family-complex="Courier New"/>
    </style:style>
    <style:style style:family="text" style:name="T603">
      <style:text-properties fo:font-family="Wingdings" style:font-family-asian="Wingdings" style:font-family-complex="Wingdings"/>
    </style:style>
    <style:style style:family="text" style:name="T604">
      <style:text-properties fo:font-family="Symbol" style:font-family-asian="Symbol" style:font-family-complex="Symbol"/>
    </style:style>
    <style:style style:family="text" style:name="T605">
      <style:text-properties fo:font-family="Courier New" style:font-family-asian="Courier New" style:font-family-complex="Courier New"/>
    </style:style>
    <style:style style:family="text" style:name="T606">
      <style:text-properties fo:font-family="Wingdings" style:font-family-asian="Wingdings" style:font-family-complex="Wingdings"/>
    </style:style>
    <style:style style:family="text" style:name="T607">
      <style:text-properties fo:font-family="Symbol" style:font-family-asian="Symbol" style:font-family-complex="Symbol"/>
    </style:style>
    <style:style style:family="text" style:name="T608">
      <style:text-properties fo:font-family="Courier New" style:font-family-asian="Courier New" style:font-family-complex="Courier New"/>
    </style:style>
    <style:style style:family="text" style:name="T609">
      <style:text-properties fo:font-family="Wingdings" style:font-family-asian="Wingdings" style:font-family-complex="Wingdings"/>
    </style:style>
    <style:style style:family="text" style:name="T610">
      <style:text-properties fo:font-family="Symbol" style:font-family-asian="Symbol" style:font-family-complex="Symbol"/>
    </style:style>
    <style:style style:family="text" style:name="T611">
      <style:text-properties fo:font-family="Courier New" style:font-family-asian="Courier New" style:font-family-complex="Courier New"/>
    </style:style>
    <style:style style:family="text" style:name="T612">
      <style:text-properties fo:font-family="Wingdings" style:font-family-asian="Wingdings" style:font-family-complex="Wingdings"/>
    </style:style>
    <style:style style:family="text" style:name="T613">
      <style:text-properties fo:font-family="Symbol" style:font-family-asian="Symbol" style:font-family-complex="Symbol"/>
    </style:style>
    <style:style style:family="text" style:name="T614">
      <style:text-properties fo:font-family="Courier New" style:font-family-asian="Courier New" style:font-family-complex="Courier New"/>
    </style:style>
    <style:style style:family="text" style:name="T615">
      <style:text-properties fo:font-family="Wingdings" style:font-family-asian="Wingdings" style:font-family-complex="Wingdings"/>
    </style:style>
    <style:style style:family="text" style:name="T616">
      <style:text-properties fo:font-family="Symbol" style:font-family-asian="Symbol" style:font-family-complex="Symbol"/>
    </style:style>
    <style:style style:family="text" style:name="T617">
      <style:text-properties fo:font-family="Courier New" style:font-family-asian="Courier New" style:font-family-complex="Courier New"/>
    </style:style>
    <style:style style:family="text" style:name="T618">
      <style:text-properties fo:font-family="Wingdings" style:font-family-asian="Wingdings" style:font-family-complex="Wingdings"/>
    </style:style>
    <style:style style:family="text" style:name="T619">
      <style:text-properties fo:font-family="Symbol" style:font-family-asian="Symbol" style:font-family-complex="Symbol"/>
    </style:style>
    <style:style style:family="text" style:name="T620">
      <style:text-properties fo:font-family="Courier New" style:font-family-asian="Courier New" style:font-family-complex="Courier New"/>
    </style:style>
    <style:style style:family="text" style:name="T621">
      <style:text-properties fo:font-family="Wingdings" style:font-family-asian="Wingdings" style:font-family-complex="Wingdings"/>
    </style:style>
    <style:style style:family="text" style:name="T622">
      <style:text-properties fo:font-family="Symbol" style:font-family-asian="Symbol" style:font-family-complex="Symbol"/>
    </style:style>
    <style:style style:family="text" style:name="T623">
      <style:text-properties fo:font-family="Courier New" style:font-family-asian="Courier New" style:font-family-complex="Courier New"/>
    </style:style>
    <style:style style:family="text" style:name="T624">
      <style:text-properties fo:font-family="Wingdings" style:font-family-asian="Wingdings" style:font-family-complex="Wingdings"/>
    </style:style>
    <style:style style:family="text" style:name="T625">
      <style:text-properties fo:font-family="Symbol" style:font-family-asian="Symbol" style:font-family-complex="Symbol"/>
    </style:style>
    <style:style style:family="text" style:name="T626">
      <style:text-properties fo:font-family="Courier New" style:font-family-asian="Courier New" style:font-family-complex="Courier New"/>
    </style:style>
    <style:style style:family="text" style:name="T627">
      <style:text-properties fo:font-family="Wingdings" style:font-family-asian="Wingdings" style:font-family-complex="Wingdings"/>
    </style:style>
    <style:style style:family="text" style:name="T628">
      <style:text-properties fo:font-family="Symbol" style:font-family-asian="Symbol" style:font-family-complex="Symbol"/>
    </style:style>
    <style:style style:family="text" style:name="T629">
      <style:text-properties fo:font-family="Courier New" style:font-family-asian="Courier New" style:font-family-complex="Courier New"/>
    </style:style>
    <style:style style:family="text" style:name="T630">
      <style:text-properties fo:font-family="Wingdings" style:font-family-asian="Wingdings" style:font-family-complex="Wingdings"/>
    </style:style>
    <style:style style:family="text" style:name="T631">
      <style:text-properties fo:font-family="Symbol" style:font-family-asian="Symbol" style:font-family-complex="Symbol"/>
    </style:style>
    <style:style style:family="text" style:name="T632">
      <style:text-properties fo:font-family="Courier New" style:font-family-asian="Courier New" style:font-family-complex="Courier New"/>
    </style:style>
    <style:style style:family="text" style:name="T633">
      <style:text-properties fo:font-family="Wingdings" style:font-family-asian="Wingdings" style:font-family-complex="Wingdings"/>
    </style:style>
    <style:style style:family="text" style:name="T634">
      <style:text-properties fo:font-family="Symbol" style:font-family-asian="Symbol" style:font-family-complex="Symbol"/>
    </style:style>
    <style:style style:family="text" style:name="T635">
      <style:text-properties fo:font-family="Courier New" style:font-family-asian="Courier New" style:font-family-complex="Courier New"/>
    </style:style>
    <style:style style:family="text" style:name="T636">
      <style:text-properties fo:font-family="Wingdings" style:font-family-asian="Wingdings" style:font-family-complex="Wingdings"/>
    </style:style>
    <style:style style:family="text" style:name="T637">
      <style:text-properties fo:font-family="Symbol" style:font-family-asian="Symbol" style:font-family-complex="Symbol"/>
    </style:style>
    <style:style style:family="text" style:name="T638">
      <style:text-properties fo:font-family="Courier New" style:font-family-asian="Courier New" style:font-family-complex="Courier New"/>
    </style:style>
    <style:style style:family="text" style:name="T639">
      <style:text-properties fo:font-family="Wingdings" style:font-family-asian="Wingdings" style:font-family-complex="Wingdings"/>
    </style:style>
    <style:style style:family="text" style:name="T640">
      <style:text-properties fo:font-family="Symbol" style:font-family-asian="Symbol" style:font-family-complex="Symbol"/>
    </style:style>
    <style:style style:family="text" style:name="T641">
      <style:text-properties fo:font-family="Courier New" style:font-family-asian="Courier New" style:font-family-complex="Courier New"/>
    </style:style>
    <style:style style:family="text" style:name="T642">
      <style:text-properties fo:font-family="Wingdings" style:font-family-asian="Wingdings" style:font-family-complex="Wingdings"/>
    </style:style>
    <style:style style:family="text" style:name="T643">
      <style:text-properties fo:font-family="Symbol" style:font-family-asian="Symbol" style:font-family-complex="Symbol"/>
    </style:style>
    <style:style style:family="text" style:name="T644">
      <style:text-properties fo:font-family="Courier New" style:font-family-asian="Courier New" style:font-family-complex="Courier New"/>
    </style:style>
    <style:style style:family="text" style:name="T645">
      <style:text-properties fo:font-family="Wingdings" style:font-family-asian="Wingdings" style:font-family-complex="Wingdings"/>
    </style:style>
    <style:style style:family="text" style:name="T646">
      <style:text-properties fo:font-family="Symbol" style:font-family-asian="Symbol" style:font-family-complex="Symbol"/>
    </style:style>
    <style:style style:family="text" style:name="T647">
      <style:text-properties fo:font-family="Courier New" style:font-family-asian="Courier New" style:font-family-complex="Courier New"/>
    </style:style>
    <style:style style:family="text" style:name="T648">
      <style:text-properties fo:font-family="Wingdings" style:font-family-asian="Wingdings" style:font-family-complex="Wingdings"/>
    </style:style>
    <style:style style:family="text" style:name="T649">
      <style:text-properties fo:font-family="Symbol" style:font-family-asian="Symbol" style:font-family-complex="Symbol"/>
    </style:style>
    <style:style style:family="text" style:name="T650">
      <style:text-properties fo:font-family="Courier New" style:font-family-asian="Courier New" style:font-family-complex="Courier New"/>
    </style:style>
    <style:style style:family="text" style:name="T651">
      <style:text-properties fo:font-family="Wingdings" style:font-family-asian="Wingdings" style:font-family-complex="Wingdings"/>
    </style:style>
    <style:style style:family="text" style:name="T652">
      <style:text-properties fo:font-family="Symbol" style:font-family-asian="Symbol" style:font-family-complex="Symbol"/>
    </style:style>
    <style:style style:family="text" style:name="T653">
      <style:text-properties fo:font-family="Courier New" style:font-family-asian="Courier New" style:font-family-complex="Courier New"/>
    </style:style>
    <style:style style:family="text" style:name="T654">
      <style:text-properties fo:font-family="Wingdings" style:font-family-asian="Wingdings" style:font-family-complex="Wingdings"/>
    </style:style>
    <style:style style:family="text" style:name="T655">
      <style:text-properties fo:font-family="Symbol" style:font-family-asian="Symbol" style:font-family-complex="Symbol"/>
    </style:style>
    <style:style style:family="text" style:name="T656">
      <style:text-properties fo:font-family="Courier New" style:font-family-asian="Courier New" style:font-family-complex="Courier New"/>
    </style:style>
    <style:style style:family="text" style:name="T657">
      <style:text-properties fo:font-family="Wingdings" style:font-family-asian="Wingdings" style:font-family-complex="Wingdings"/>
    </style:style>
    <style:style style:family="text" style:name="T658">
      <style:text-properties fo:font-family="Symbol" style:font-family-asian="Symbol" style:font-family-complex="Symbol"/>
    </style:style>
    <style:style style:family="text" style:name="T659">
      <style:text-properties fo:font-family="Courier New" style:font-family-asian="Courier New" style:font-family-complex="Courier New"/>
    </style:style>
    <style:style style:family="text" style:name="T660">
      <style:text-properties fo:font-family="Wingdings" style:font-family-asian="Wingdings" style:font-family-complex="Wingdings"/>
    </style:style>
    <style:style style:family="text" style:name="T661">
      <style:text-properties fo:font-family="Symbol" style:font-family-asian="Symbol" style:font-family-complex="Symbol"/>
    </style:style>
    <style:style style:family="text" style:name="T662">
      <style:text-properties fo:font-family="Courier New" style:font-family-asian="Courier New" style:font-family-complex="Courier New"/>
    </style:style>
    <style:style style:family="text" style:name="T663">
      <style:text-properties fo:font-family="Wingdings" style:font-family-asian="Wingdings" style:font-family-complex="Wingdings"/>
    </style:style>
    <style:style style:family="text" style:name="T664">
      <style:text-properties fo:font-family="Symbol" style:font-family-asian="Symbol" style:font-family-complex="Symbol"/>
    </style:style>
    <style:style style:family="text" style:name="T665">
      <style:text-properties fo:font-family="Courier New" style:font-family-asian="Courier New" style:font-family-complex="Courier New"/>
    </style:style>
    <style:style style:family="text" style:name="T666">
      <style:text-properties fo:font-family="Wingdings" style:font-family-asian="Wingdings" style:font-family-complex="Wingdings"/>
    </style:style>
    <style:style style:family="text" style:name="T667">
      <style:text-properties fo:font-family="Symbol" style:font-family-asian="Symbol" style:font-family-complex="Symbol"/>
    </style:style>
    <style:style style:family="text" style:name="T668">
      <style:text-properties fo:font-family="Courier New" style:font-family-asian="Courier New" style:font-family-complex="Courier New"/>
    </style:style>
    <style:style style:family="text" style:name="T669">
      <style:text-properties fo:font-family="Wingdings" style:font-family-asian="Wingdings" style:font-family-complex="Wingdings"/>
    </style:style>
    <style:style style:family="text" style:name="T670">
      <style:text-properties fo:font-family="Symbol" style:font-family-asian="Symbol" style:font-family-complex="Symbol"/>
    </style:style>
    <style:style style:family="text" style:name="T671">
      <style:text-properties fo:font-family="Courier New" style:font-family-asian="Courier New" style:font-family-complex="Courier New"/>
    </style:style>
    <style:style style:family="text" style:name="T672">
      <style:text-properties fo:font-family="Wingdings" style:font-family-asian="Wingdings" style:font-family-complex="Wingdings"/>
    </style:style>
    <style:style style:family="text" style:name="T673">
      <style:text-properties fo:font-family="Symbol" style:font-family-asian="Symbol" style:font-family-complex="Symbol"/>
    </style:style>
    <style:style style:family="text" style:name="T674">
      <style:text-properties fo:font-family="Courier New" style:font-family-asian="Courier New" style:font-family-complex="Courier New"/>
    </style:style>
    <style:style style:family="text" style:name="T675">
      <style:text-properties fo:font-family="Wingdings" style:font-family-asian="Wingdings" style:font-family-complex="Wingdings"/>
    </style:style>
    <style:style style:family="text" style:name="T676">
      <style:text-properties fo:font-family="Symbol" style:font-family-asian="Symbol" style:font-family-complex="Symbol"/>
    </style:style>
    <style:style style:family="text" style:name="T677">
      <style:text-properties fo:font-family="Courier New" style:font-family-asian="Courier New" style:font-family-complex="Courier New"/>
    </style:style>
    <style:style style:family="text" style:name="T678">
      <style:text-properties fo:font-family="Wingdings" style:font-family-asian="Wingdings" style:font-family-complex="Wingdings"/>
    </style:style>
    <style:style style:family="text" style:name="T679">
      <style:text-properties fo:font-family="Symbol" style:font-family-asian="Symbol" style:font-family-complex="Symbol"/>
    </style:style>
    <style:style style:family="text" style:name="T680">
      <style:text-properties fo:font-family="Courier New" style:font-family-asian="Courier New" style:font-family-complex="Courier New"/>
    </style:style>
    <style:style style:family="text" style:name="T681">
      <style:text-properties fo:font-family="Wingdings" style:font-family-asian="Wingdings" style:font-family-complex="Wingdings"/>
    </style:style>
    <style:style style:family="text" style:name="T682">
      <style:text-properties fo:font-family="Symbol" style:font-family-asian="Symbol" style:font-family-complex="Symbol"/>
    </style:style>
    <style:style style:family="text" style:name="T683">
      <style:text-properties fo:font-family="Courier New" style:font-family-asian="Courier New" style:font-family-complex="Courier New"/>
    </style:style>
    <style:style style:family="text" style:name="T684">
      <style:text-properties fo:font-family="Wingdings" style:font-family-asian="Wingdings" style:font-family-complex="Wingdings"/>
    </style:style>
    <style:style style:family="text" style:name="T685">
      <style:text-properties fo:font-family="Symbol" style:font-family-asian="Symbol" style:font-family-complex="Symbol"/>
    </style:style>
    <style:style style:family="text" style:name="T686">
      <style:text-properties fo:font-family="Courier New" style:font-family-asian="Courier New" style:font-family-complex="Courier New"/>
    </style:style>
    <style:style style:family="text" style:name="T687">
      <style:text-properties fo:font-family="Wingdings" style:font-family-asian="Wingdings" style:font-family-complex="Wingdings"/>
    </style:style>
    <style:style style:family="text" style:name="T688">
      <style:text-properties fo:font-family="Symbol" style:font-family-asian="Symbol" style:font-family-complex="Symbol"/>
    </style:style>
    <style:style style:family="text" style:name="T689">
      <style:text-properties fo:font-family="Courier New" style:font-family-asian="Courier New" style:font-family-complex="Courier New"/>
    </style:style>
    <style:style style:family="text" style:name="T690">
      <style:text-properties fo:font-family="Wingdings" style:font-family-asian="Wingdings" style:font-family-complex="Wingdings"/>
    </style:style>
    <style:style style:family="text" style:name="T691">
      <style:text-properties fo:font-family="Symbol" style:font-family-asian="Symbol" style:font-family-complex="Symbol"/>
    </style:style>
    <style:style style:family="text" style:name="T692">
      <style:text-properties fo:font-family="Courier New" style:font-family-asian="Courier New" style:font-family-complex="Courier New"/>
    </style:style>
    <style:style style:family="text" style:name="T693">
      <style:text-properties fo:font-family="Wingdings" style:font-family-asian="Wingdings" style:font-family-complex="Wingdings"/>
    </style:style>
    <style:style style:family="text" style:name="T694">
      <style:text-properties fo:font-family="Symbol" style:font-family-asian="Symbol" style:font-family-complex="Symbol"/>
    </style:style>
    <style:style style:family="text" style:name="T695">
      <style:text-properties fo:font-family="Courier New" style:font-family-asian="Courier New" style:font-family-complex="Courier New"/>
    </style:style>
    <style:style style:family="text" style:name="T696">
      <style:text-properties fo:font-family="Wingdings" style:font-family-asian="Wingdings" style:font-family-complex="Wingdings"/>
    </style:style>
    <style:style style:family="text" style:name="T697">
      <style:text-properties fo:font-family="Symbol" style:font-family-asian="Symbol" style:font-family-complex="Symbol"/>
    </style:style>
    <style:style style:family="text" style:name="T698">
      <style:text-properties fo:font-family="Courier New" style:font-family-asian="Courier New" style:font-family-complex="Courier New"/>
    </style:style>
    <style:style style:family="text" style:name="T699">
      <style:text-properties fo:font-family="Wingdings" style:font-family-asian="Wingdings" style:font-family-complex="Wingdings"/>
    </style:style>
    <style:style style:family="text" style:name="T700">
      <style:text-properties fo:font-family="Symbol" style:font-family-asian="Symbol" style:font-family-complex="Symbol"/>
    </style:style>
    <style:style style:family="text" style:name="T701">
      <style:text-properties fo:font-family="Courier New" style:font-family-asian="Courier New" style:font-family-complex="Courier New"/>
    </style:style>
    <style:style style:family="text" style:name="T702">
      <style:text-properties fo:font-family="Wingdings" style:font-family-asian="Wingdings" style:font-family-complex="Wingdings"/>
    </style:style>
    <style:style style:family="text" style:name="T703">
      <style:text-properties fo:font-family="Symbol" style:font-family-asian="Symbol" style:font-family-complex="Symbol"/>
    </style:style>
    <style:style style:family="text" style:name="T704">
      <style:text-properties fo:font-family="Courier New" style:font-family-asian="Courier New" style:font-family-complex="Courier New"/>
    </style:style>
    <style:style style:family="text" style:name="T705">
      <style:text-properties fo:font-family="Wingdings" style:font-family-asian="Wingdings" style:font-family-complex="Wingdings"/>
    </style:style>
    <style:style style:family="text" style:name="T706">
      <style:text-properties fo:font-family="Symbol" style:font-family-asian="Symbol" style:font-family-complex="Symbol"/>
    </style:style>
    <style:style style:family="text" style:name="T707">
      <style:text-properties fo:font-family="Courier New" style:font-family-asian="Courier New" style:font-family-complex="Courier New"/>
    </style:style>
    <style:style style:family="text" style:name="T708">
      <style:text-properties fo:font-family="Wingdings" style:font-family-asian="Wingdings" style:font-family-complex="Wingdings"/>
    </style:style>
    <style:style style:family="text" style:name="T709">
      <style:text-properties fo:font-family="Symbol" style:font-family-asian="Symbol" style:font-family-complex="Symbol"/>
    </style:style>
    <style:style style:family="text" style:name="T710">
      <style:text-properties fo:font-family="Courier New" style:font-family-asian="Courier New" style:font-family-complex="Courier New"/>
    </style:style>
    <style:style style:family="text" style:name="T711">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7"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4">
      <text:list-level-style-bullet text:level="1" text:style-name="T20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6">
      <text:list-level-style-bullet text:level="1" text:style-name="T22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8">
      <text:list-level-style-bullet text:level="1" text:style-name="T24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0">
      <text:list-level-style-bullet text:level="1" text:style-name="T26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2">
      <text:list-level-style-bullet text:level="1" text:style-name="T28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4">
      <text:list-level-style-bullet text:level="1" text:style-name="T29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6">
      <text:list-level-style-bullet text:level="1" text:style-name="T31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7">
      <text:list-level-style-bullet text:level="1" text:style-name="T32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2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2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2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3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3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3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8">
      <text:list-level-style-bullet text:level="1" text:style-name="T33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3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3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3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3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4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4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9">
      <text:list-level-style-bullet text:level="1" text:style-name="T34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4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4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4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4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4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5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0">
      <text:list-level-style-bullet text:level="1" text:style-name="T35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5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5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5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5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5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5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1">
      <text:list-level-style-bullet text:level="1" text:style-name="T36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6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6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6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6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6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6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6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2">
      <text:list-level-style-bullet text:level="1" text:style-name="T37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7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7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7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7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7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7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7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7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3">
      <text:list-level-style-bullet text:level="1" text:style-name="T37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8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8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8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8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8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8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8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4">
      <text:list-level-style-bullet text:level="1" text:style-name="T38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9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9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9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9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9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9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0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0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1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1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1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2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2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2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2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2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2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2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3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3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3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3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3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3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3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4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0">
      <text:list-level-style-bullet text:level="1" text:style-name="T44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4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4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4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4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4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4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1">
      <text:list-level-style-bullet text:level="1" text:style-name="T45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5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5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5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5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5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5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5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2">
      <text:list-level-style-bullet text:level="1" text:style-name="T46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6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6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6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6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6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6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6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6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3">
      <text:list-level-style-bullet text:level="1" text:style-name="T46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7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7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7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7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7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7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7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4">
      <text:list-level-style-bullet text:level="1" text:style-name="T47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8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8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8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8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8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8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5">
      <text:list-level-style-bullet text:level="1" text:style-name="T48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8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9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9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9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9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9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6">
      <text:list-level-style-bullet text:level="1" text:style-name="T49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9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9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0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0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0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0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0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0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0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1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1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1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1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1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1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1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2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2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2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2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2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2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2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3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3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3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3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3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3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3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1">
      <text:list-level-style-bullet text:level="1" text:style-name="T54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4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4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4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4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4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4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4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2">
      <text:list-level-style-bullet text:level="1" text:style-name="T55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5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5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5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5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5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5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5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5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6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6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6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6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6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6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6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7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7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7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7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7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7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7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8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8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8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8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8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8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8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9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9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9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9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9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9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9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0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0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0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0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0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0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0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1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1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1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1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1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1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1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2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0">
      <text:list-level-style-bullet text:level="1" text:style-name="T62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2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2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2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2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2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2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1">
      <text:list-level-style-bullet text:level="1" text:style-name="T63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3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3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3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3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3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3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3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2">
      <text:list-level-style-bullet text:level="1" text:style-name="T64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4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4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4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4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4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4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4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4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3">
      <text:list-level-style-bullet text:level="1" text:style-name="T64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5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5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5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5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5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5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5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4">
      <text:list-level-style-bullet text:level="1" text:style-name="T65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6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6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6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6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6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6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5">
      <text:list-level-style-bullet text:level="1" text:style-name="T66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6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7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7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7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7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7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6">
      <text:list-level-style-bullet text:level="1" text:style-name="T67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7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7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8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8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8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8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7">
      <text:list-level-style-bullet text:level="1" text:style-name="T68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8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8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8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9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9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9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8">
      <text:list-level-style-bullet text:level="1" text:style-name="T69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9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9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9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9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0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0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9">
      <text:list-level-style-bullet text:level="1" text:style-name="T70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0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0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0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0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0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1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1.27cm" fo:margin-bottom="1.27cm" fo:margin-left="2.54cm" fo:margin-right="2.54cm"/>
    </style:page-layout>
    <style:page-layout style:name="Mpm2">
      <style:page-layout-properties fo:page-width="21.59cm" fo:page-height="27.94cm" style:print-orientation="portrait" fo:margin-top="1.27cm" fo:margin-bottom="1.27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4.0.129</meta:generator>
    <dc:creator/>
  </office:meta>
</office:document-meta>
</file>