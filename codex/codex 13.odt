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XIII ) Trimorphic Protennoia</text:p>
      <text:p text:style-name="P2"><text:span text:style-name="T1"> </text:span><text:span text:style-name="T2">(35/1) </text:span> [ⲁⲛⲟⲕ] ⲧ̣ⲉ ⲧⲡⲣⲱ̣[ⲧⲉⲛⲛⲟⲓⲁ ⲡⲙ]ⲉⲉⲩⲉ ⲉⲧ <text:line-break/><text:span text:style-name="T1"> </text:span><text:span text:style-name="T2">(35/2) </text:span> ϣ̣[ⲟⲟ]ⲡ̣· ϩⲙ̣̅ [ⲡⲟⲩⲟⲉⲓⲛ ⲁⲛⲟⲕ] ⲡ̣ⲉ ⲡⲕⲓⲙ <text:line-break/><text:span text:style-name="T1"> </text:span><text:span text:style-name="T2">(35/3) </text:span> ⲉⲧϣⲟⲟⲡ ϩⲙ̅ ⲡ[ⲧⲏⲣϥ ⲧⲁⲓ̈ ⲉⲧⲉ ⲡ]ⲧⲏⲣϥ’ ⲱ <text:line-break/><text:span text:style-name="T1"> </text:span><text:span text:style-name="T2">(35/4) </text:span> ϩⲉ ⲉⲣⲁ̣ⲧ̣ϥ̣ ϩⲣⲁ[ⲓ̈ ⲛ̅ϩⲏⲧⲥ̅ ⲡϣⲟⲣ]ⲡ· ⲛ̅ϫⲡⲟ <text:line-break/><text:span text:style-name="T1"> </text:span><text:span text:style-name="T2">(35/5) </text:span> ϩⲛ̅ ⲛⲉ̣ⲛⲧⲁⲩ̣ϣ[ⲱⲡⲉ ⲧⲉⲧϣⲟ]ⲟⲡ ϩ̣ⲁ[ⲑ]ⲏ ⲙ̅ <text:line-break/><text:span text:style-name="T1"> </text:span><text:span text:style-name="T2">(35/6) </text:span> ⲡⲧ[ⲏ]ⲣϥ· ⲉ̣ⲩⲙⲟⲩ̣[ⲧⲉ ⲉⲣⲟⲥ] ⲛ̅ϣⲟⲙⲧ ⲛ̅ⲣⲁ̣ⲛ ⲉⲥ <text:line-break/><text:span text:style-name="T1"> </text:span><text:span text:style-name="T2">(35/7) </text:span> ϣⲟⲟⲡ· ⲟⲩⲁⲁⲧ̣ⲥ̣ [ⲉⲥϫⲏ]ⲕ· ⲉⲃⲟⲗ’ ⲁ[ⲛ]ⲟⲕ’ ⲟⲩ <text:line-break/><text:span text:style-name="T1"> </text:span><text:span text:style-name="T2">(35/8) </text:span> ⲁⲧ%6ⲛⲁⲩ ⲉⲣⲟ̣[ⲥ ϩⲣ]ⲁⲓ̈ ϩⲙ̣̅ ⲡⲙⲉⲉ̣ⲩⲉ ⲙ̅ⲡⲓⲁⲧ%6· <text:line-break/><text:span text:style-name="T1"> </text:span><text:span text:style-name="T2">(35/9) </text:span> ⲛⲁⲩ ⲉⲣⲟϥ̣ ⲉⲉ̣[ⲓ]ϭⲟⲗ[̅ⲡ̅]̅ ⲉⲃⲟⲗ̣ ϩⲛ̅ ⲛⲓⲁⲧϣⲓ <text:line-break/><text:span text:style-name="T1"> </text:span><text:span text:style-name="T2">(35/10) </text:span> ⲧⲟⲩ ⲛⲓⲁⲧϣⲁϫⲉ ⲙ̅ⲙⲟⲟⲩ ⲁⲛⲟⲕ’ ⲟⲩⲁⲧ%6· <text:line-break/><text:span text:style-name="T1"> </text:span><text:span text:style-name="T2">(35/11) </text:span> ⲧⲉϩⲟⲥ ⲉⲉⲓϣⲟⲟⲡ̣ ϩⲙ̅ ⲡⲓⲁⲧ%6ⲧⲉϩⲟϥ ⲉⲉⲓ <text:line-break/><text:span text:style-name="T1"> </text:span><text:span text:style-name="T2">(35/12) </text:span> ⲕⲓⲙ· ϩⲣⲁⲓ̈ ϩⲛ̅ ⲥⲱⲛⲧ̣ ⲛⲓⲙ̣ ⲁ̣ⲛⲟⲕ ⲡⲉ̣ ⲡⲱⲛϩ <text:line-break/><text:span text:style-name="T1"> </text:span><text:span text:style-name="T2">(35/13) </text:span> ⲛ̅ⲧⲁⲉ̣ⲡⲓⲛⲟⲓⲁ ⲧⲁ[ⲓ̈ ⲉⲧϣⲟ]ⲟⲡ’ ϩⲣ̣ⲁⲓ̈ ϩⲛ̅ <text:line-break/><text:span text:style-name="T1"> </text:span><text:span text:style-name="T2">(35/14) </text:span> ϭ̣ⲁⲙ ⲛⲓⲙ ⲁⲩⲱ ϩⲣⲁⲓ̈ ϩⲛ̣̅ ⲕⲓⲙ’ ⲛⲓⲙ ⲛ̅ⲁⲛⲉϩ <text:line-break/><text:span text:style-name="T1"> </text:span><text:span text:style-name="T2">(35/15) </text:span> ⲁ̣ⲩⲱ ϩⲉⲛ’ⲟⲩⲁⲉⲓⲛⲉ ⲛ̅ⲁⲧⲛⲁⲩ ⲉⲣⲟⲟⲩ ⲁⲩⲱ̣ <text:line-break/><text:span text:style-name="T1"> </text:span><text:span text:style-name="T2">(35/16) </text:span> ϩⲣⲁⲓ̈ ϩⲛ̅ ⲛ̅ⲁⲣⲭⲱⲛ ⲙⲛ̅ ⲛ̅ⲁⲅ’ⲅⲉⲗⲟⲥ ⲙⲛ̅ <text:line-break/><text:span text:style-name="T1"> </text:span><text:span text:style-name="T2">(35/17) </text:span> ⲛ̅ⲇ[ⲁⲓ]ⲙ̣[ⲱ]ⲛ ⲙⲛ̣̅ ⲯⲩⲭⲏ ⲛⲓⲙ ⲉⲧϣⲟⲟⲡ’ <text:line-break/><text:span text:style-name="T1"> </text:span><text:span text:style-name="T2">(35/18) </text:span> ϩⲙ̅ ⲡⲧ̣[ⲁⲣⲧ]ⲁ̣ⲣⲟⲥ ⲙⲛ̅ ⲯⲩⲭⲏ ⲛⲓⲙ ⲛ̅ϩⲩⲗⲓⲕⲏ <text:line-break/><text:span text:style-name="T1"> </text:span><text:span text:style-name="T2">(35/19) </text:span> ⲉⲉⲓϣⲟⲟⲡ’ ϩⲛ̅ ⲛⲉⲛⲧⲁⲩϣⲱⲡⲉ ⲉⲉⲓⲕⲓⲙ ϩⲛ̅ <text:line-break/><text:span text:style-name="T1"> </text:span><text:span text:style-name="T2">(35/20) </text:span> ⲟⲩⲟⲛ ⲛⲓⲙ [ⲁⲩ]ⲱ ⲉⲉⲓϭⲣⲏ ⲛ̅ϩⲏⲧⲟⲩ ⲧⲏ <text:line-break/><text:span text:style-name="T1"> </text:span><text:span text:style-name="T2">(35/21) </text:span> ⲣⲟⲩ ⲉⲉⲓⲙⲟⲟ̣ϣ̣ⲉ̣ ϩⲛ̅ ⲟⲩⲥⲟⲟⲩⲧⲛ̅ ⲁⲩⲱ ⲛⲉ <text:line-break/><text:span text:style-name="T1"> </text:span><text:span text:style-name="T2">(35/22) </text:span> ⲧⲛ̅ⲕⲁⲧⲕ’ ⲉⲉⲓⲛⲉ[ϩ]ⲥ̣ⲉ ⲙ̅ⲙⲟⲟⲩ ⲁⲩⲱ ⲁⲛⲟⲕ’ <text:line-break/><text:span text:style-name="T1"> </text:span><text:span text:style-name="T2">(35/23) </text:span> ⲡⲉ ⲡⲛⲁⲩ ⲉⲃⲟⲗ ⲛ̅ⲛⲉⲧ̓ϣⲟⲟⲡ%6 ϩⲙ̅ ⲡϩⲓⲛⲏⲃ <text:line-break/><text:span text:style-name="T1"> </text:span><text:span text:style-name="T2">(35/24) </text:span> ⲁⲛⲟⲕ ⲡⲉ ⲡⲓⲁⲧⲛⲁⲩ ⲉⲣⲟϥ ϩⲣ[ⲁ]ⲓ̈ ϩⲙ̅ ⲡⲧⲏⲣϥ <text:line-break/><text:span text:style-name="T1"> </text:span><text:span text:style-name="T2">(35/25) </text:span> ⲁⲛⲟⲕ’ ⲡⲉⲧϣⲟϫⲛⲉ ⲛ̅ⲛⲉⲧϩⲏⲡ· ⲉⲉⲓⲥⲟ <text:line-break/><text:span text:style-name="T1"> </text:span><text:span text:style-name="T2">(35/26) </text:span> ⲟⲩⲛⲉ ⲙ̅ⲡⲧⲏⲣϥ ⲉⲧϣⲟⲟⲡ ϩⲣⲁⲓ̈ ⲛ̅ϩⲏⲧϥ̅ <text:line-break/><text:span text:style-name="T1"> </text:span><text:span text:style-name="T2">(35/27) </text:span> ⲁⲛⲟⲕ’ ⲟⲩⲁⲧⲏⲡⲉ ⲡⲁⲣⲁ ⲟⲩⲟⲛ ⲛⲓⲙ· ⲁⲛⲟⲕ <text:line-break/><text:span text:style-name="T1"> </text:span><text:span text:style-name="T2">(35/28) </text:span> ⲟⲩⲁⲧϣⲓⲧϥ· ⲛ̅ⲁⲧϣⲁϫ̣[ⲉ] ⲙ̣̅ⲙⲟϥ ⲁⲛⲟⲕ ⲛ̅ <text:line-break/><text:span text:style-name="T1"> </text:span><text:span text:style-name="T2">(35/29) </text:span> ⲇⲉ ⲉⲉⲓϣⲁⲛ’ⲟⲩ[ⲱϣⲉ ϯⲛ]ⲁⲟⲩ̓ⲟⲛϩⲧ ⲉⲃⲟⲗ̣ <text:line-break/><text:span text:style-name="T1"> </text:span><text:span text:style-name="T2">(35/30) </text:span> ⲟⲩⲁⲁⲧ· ⲁⲛⲁⲕ̣ [ⲧⲉ ⲧⲁⲡⲉ ⲙ̅]ⲡⲧⲏⲣϥ ⲉⲉⲓϣⲟ <text:line-break/><text:span text:style-name="T1"> </text:span><text:span text:style-name="T2">(35/31) </text:span> ⲟⲡ ϩⲁⲑⲏ ⲙ̣̅[ⲧⲏⲣϥ ⲁⲩⲱ ⲁⲛ]ⲟ̣ⲕ ⲡⲉ ⲡⲧⲏⲣϥ <text:line-break/><text:span text:style-name="T1"> </text:span><text:span text:style-name="T2">(35/32) </text:span> ⲉⲉⲓϣ̣[ⲟⲟⲡ ϩⲛ̅ ⲟⲩ]ⲟ̣ⲛ̣ ⲛⲓⲙ̣ ⲁⲛⲟⲕ ⲟⲩϩⲣⲟ <text:line-break/><text:span text:style-name="T1"> </text:span><text:span text:style-name="T2">(35/33) </text:span> ⲟ̣[ⲩ ⲉϥϣⲁϫⲉ ϩⲛ̅ ⲟⲩϩⲏⲥ]ⲩ̣ⲭⲏ ⲉⲉⲓϣⲟⲟⲡ· <text:line-break/><text:span text:style-name="T1"> </text:span><text:span text:style-name="T2">(35/34) </text:span> ϫ̣[ⲛ̅ ⲛ̅ϣⲟⲣⲡ’ ⲉⲉⲓϣⲟⲟⲡ ϩ]ⲣ̣[ⲁ]ⲓ̈ ϩⲛ̅ ϯⲙ̅ⲛ̅ⲧ̅ⲕⲁ <text:line-break/><text:span text:style-name="T1"> </text:span><text:span text:style-name="T2">(35/35) </text:span> [ⲣⲱⲥ ⲉⲧⲙ̅ⲡⲕⲱⲧⲉ ⲛ̅ⲟⲩⲟⲛ] ⲛⲓⲙ ⲙ̅ⲙⲁ[ⲩ] <text:line-break/><text:span text:style-name="T1"> </text:span><text:span text:style-name="T2">(36/1) </text:span> ⲁⲩⲱ ⲡ̣[ϩ]ⲣ̣[ⲟⲟⲩ ⲡⲉ ⲉⲧϩ]ⲏ̣ⲡ ⲉⲧϣ[ⲟⲟⲡ ϩⲣⲁⲓ̈] <text:line-break/><text:span text:style-name="T1"> </text:span><text:span text:style-name="T2">(36/2) </text:span> ⲛ̅ϩⲏⲧ̣ ϩ̣ⲣ̣[ⲁⲓ̈ ϩⲙ̅ ⲡⲙⲉⲉⲩⲉ] ⲛⲁⲧ%6ⲧ̣ⲉ̣ϩ̣[ⲟϥ ⲛ̅] <text:line-break/><text:span text:style-name="T1"> </text:span><text:span text:style-name="T2">(36/3) </text:span> ⲁⲧϣⲓⲧϥ ϩ̣[ⲣⲁⲓ̈ ϩⲛ̅ ϯⲙⲛ̅]ⲧ̣ⲕⲁⲣⲱⲥ ⲛ̅ⲁⲧϣⲓⲧ[ⲥ] <text:line-break/><text:span text:style-name="T1"> </text:span><text:span text:style-name="T2">(36/4) </text:span> ⲁⲛⲟⲕ ⲁⲉ[ⲓⲃⲱⲕ ⲉϩⲣⲁⲓ̈ ⲉⲧ]ⲙⲏⲧⲉ̣ ⲛ̅ⲁⲙⲛ̅ⲧ[ⲉ] <text:line-break/><text:span text:style-name="T1"> </text:span><text:span text:style-name="T2">(36/5) </text:span> ⲁⲉ[ⲓ]ⲡⲣ̅ⲣⲓ̣[ⲉ ⲉϩⲣⲁⲓ̈ ⲉϫⲙ̅ ⲡ]ⲕ̣ⲁ̣ⲕⲉ ⲁⲛ̣ⲁⲕ ⲡⲉ[ⲛ] <text:line-break/><text:span text:style-name="T1"> </text:span><text:span text:style-name="T2">(36/6) </text:span> ⲧⲁⲉ̣[ⲓ]ⲃⲉⲃⲉ̣ ⲙ̣̅ⲡⲙ̣[ⲟⲟⲩ ⲁⲛ]ⲟⲕ ⲡⲉⲧ̓ϩⲏⲡ̣· ϩⲣⲁ̣[ⲓ̈] <text:line-break/><text:span text:style-name="T1"> </text:span><text:span text:style-name="T2">(36/7) </text:span> ϩⲛ̅ ϩⲉⲛⲙⲟⲟⲩ ⲉ̣[ⲩⲡⲣ̅ⲣⲓ]ⲱ̣ⲟⲩ ⲁⲛⲟⲕ ⲡⲉⲛⲧ[ⲁⲉⲓ] <text:line-break/><text:span text:style-name="T1"> </text:span><text:span text:style-name="T2">(36/8) </text:span> ⲡⲣ̅ⲣⲓⲉ ⲙ̅ⲡⲧⲏⲣϥ ⲕ̣ⲁ̣ⲧ̣ⲁ ⲙ̣ⲉ̣[ⲣ]ⲟ̣ⲥ ϩⲣⲁⲓ̈ ϩⲙ̅ ⲡⲁ̣ <text:line-break/><text:span text:style-name="T1"> </text:span><text:span text:style-name="T2">(36/9) </text:span> ⲙⲉⲉⲩⲉ ⲁⲛⲟ̣ⲕ ⲡⲉ̣ⲧⲟⲧⲡ̣ ⲙ̣̅ⲡϩ̣ⲣⲟⲟⲩ ⲉⲃⲟ[ⲗ] <text:line-break/><text:span text:style-name="T1"> </text:span><text:span text:style-name="T2">(36/10) </text:span> ϩⲓⲧⲟⲟⲧ%6· ⲉϣⲁⲥⲉⲓ ⲉⲃⲟⲗ ⲛ̣̅ϭⲓ ⲧⲅⲛⲱⲥⲓⲥ ⲉⲉ[ⲓ] <text:line-break/><text:span text:style-name="T1"> </text:span><text:span text:style-name="T2">(36/11) </text:span> ϣⲟⲟⲡ· ϩⲛ̅ ⲛⲓⲁⲧϣⲁ̣ϫ̣ⲉ ⲙ̅ⲙⲟⲟ̣ⲩ ⲙⲛ̅ ⲛⲓⲁⲧ̓· <text:line-break/><text:span text:style-name="T1"> </text:span><text:span text:style-name="T2">(36/12) </text:span> ⲥⲟⲩⲱⲛⲟⲩ ⲁ̣ⲛⲟⲕ ⲡ̣ⲉ ⲧⲁⲓⲥⲑⲏⲥⲓⲥ ⲙⲛ̅ ⲡⲥⲟ <text:line-break/><text:soft-page-break/><text:span text:style-name="T1"> </text:span><text:span text:style-name="T2">(36/13) </text:span> ⲟⲩⲛ ⲉⲉⲓⲧⲉ[ⲩⲟ ⲛ̅]ⲟ̣ⲩϩⲣⲟⲟⲩ ⲉⲃⲟⲗ̣ ϩⲓⲧⲟⲟⲧϥ̣̅ <text:line-break/><text:span text:style-name="T1"> </text:span><text:span text:style-name="T2">(36/14) </text:span> ⲛ̅ⲟⲩⲙⲉⲉⲩⲉ ⲁ[ⲛⲟ]ⲕ̣ ⲡⲉ ⲡϩⲣⲟⲟⲩ ⲉⲧϣⲟⲟ̣ⲡ̣ <text:line-break/><text:span text:style-name="T1"> </text:span><text:span text:style-name="T2">(36/15) </text:span> ⲉⲉⲓϯ ϩⲣⲁⲩ ϩⲛ̅ ⲟⲩⲟⲛ ⲛⲓⲙ· ⲁⲩⲱ ⲥⲉⲥⲟⲩⲱ̣[ⲛⲧ] <text:line-break/><text:span text:style-name="T1"> </text:span><text:span text:style-name="T2">(36/16) </text:span> ⲙ̅ⲙⲁⲥ ⲉⲣⲉⲟⲩⲥⲡⲉⲣⲙⲁ· ϣⲟⲟⲡ ϩⲣⲁⲓ̈ ⲛ̅ϩⲏ̣[ⲧⲟⲩ] <text:line-break/><text:span text:style-name="T1"> </text:span><text:span text:style-name="T2">(36/17) </text:span> ⲁⲛⲟⲕ ⲡⲉ ⲡⲙⲉⲉⲩⲉ ⲙ̅ⲡⲓ̣ⲱⲧ ⲁ̣[ⲩ]ⲱ̣ [ⲉⲃ]ⲟⲗ ϩⲓⲧⲟ <text:line-break/><text:span text:style-name="T1"> </text:span><text:span text:style-name="T2">(36/18) </text:span> ⲟⲧ· ⲁϥⲣ̅ϣⲟⲣⲡ’ ⲛ̅ⲉⲓ ⲉⲃⲟⲗ ⲛ̅ϭ[ⲓ ⲡϩ]ⲣ̣ⲟⲟⲩ ⲉⲧⲉ <text:line-break/><text:span text:style-name="T1"> </text:span><text:span text:style-name="T2">(36/19) </text:span> ⲡⲁⲓ̈ ⲡⲉ ⲡⲥⲟⲟⲩⲛ ⲛ̅ⲛⲉⲧⲉⲙⲛ̣̅ⲧⲉⲩ ϩⲁⲏ ⲉⲉ̣ⲓ̣ <text:line-break/><text:span text:style-name="T1"> </text:span><text:span text:style-name="T2">(36/20) </text:span> ϣⲟⲟⲡ· ⲙ̅ⲙⲉⲉⲩⲉ ⲙ̅ⲡ[ⲧⲏ]ⲣ̣ϥ· ⲉⲉⲓϩⲁⲧⲣⲉ ⲁ <text:line-break/><text:span text:style-name="T1"> </text:span><text:span text:style-name="T2">(36/21) </text:span> ϩⲟⲩⲛ· ⲁⲡⲙⲉⲉⲩⲉ ⲛ̅ⲁⲧⲥ̣[ⲟ]ⲩ̣ⲱⲛϥ· ⲁⲩⲱ ⲛ̅ⲁⲧ%6 <text:line-break/><text:span text:style-name="T1"> </text:span><text:span text:style-name="T2">(36/22) </text:span> ⲧⲉϩⲟϥ· ⲁⲉⲓⲟⲩⲟⲛϩⲧ [ⲉ]ⲃ̣ⲟⲗ ⲁⲛⲟⲕ ⲛ̅ϩⲣⲁⲓ̈ <text:line-break/><text:span text:style-name="T1"> </text:span><text:span text:style-name="T2">(36/23) </text:span> ϩⲛ̅ ⲛⲉⲛⲧ’ⲁⲩⲥⲟⲩⲱⲛⲧ· ⲧⲏⲣⲟⲩ ϫⲉ ⲁⲛⲟⲕ ⲛ̅ <text:line-break/><text:span text:style-name="T1"> </text:span><text:span text:style-name="T2">(36/24) </text:span> ⲅⲁⲣ ⲡⲉⲧϩⲁⲧⲣⲉ ⲙⲛ̅ ⲟⲩⲟⲛ ⲛⲓⲙ ⲛ̅ϩⲣⲁ ϩⲙ̅ <text:line-break/><text:span text:style-name="T1"> </text:span><text:span text:style-name="T2">(36/25) </text:span> ⲡⲙⲉⲉⲩⲉ ⲉⲧϩⲏⲡ ⲁⲩⲱ ϩⲛ̅ ⲟⲩ〈ϩ〉ⲣⲟⲟⲩ ⲉϥ’ <text:line-break/><text:span text:style-name="T1"> </text:span><text:span text:style-name="T2">(36/26) </text:span> ϫⲟⲥⲉ ⲁⲩⲱ ⲟⲩϩⲣⲟⲟⲩ ⲉⲃⲟⲗ ϩⲓⲧⲟⲟⲧϥ%6 ⲙ̅ <text:line-break/><text:span text:style-name="T1"> </text:span><text:span text:style-name="T2">(36/27) </text:span> ⲡⲙⲉⲉⲩⲉ ⲛ̅ⲁⲧⲛⲁⲩ ⲉⲣⲟϥ· ⲁⲩⲱ ⲟⲩⲁⲧϣⲓⲧϥ <text:line-break/><text:span text:style-name="T1"> </text:span><text:span text:style-name="T2">(36/28) </text:span> ⲡⲉ ⲉϥϣⲟⲟⲡ̣̓ ϩ̣ⲙ̅ ⲡⲓⲁⲧϣⲓⲧϥ̓ ⲟⲩⲙⲩⲥⲧⲏ <text:line-break/><text:span text:style-name="T1"> </text:span><text:span text:style-name="T2">(36/29) </text:span> ⲣⲓⲟⲛ ⲡⲉ ⲟⲩ̣[ⲁⲧⲉⲙⲁ]ϩ̣ⲧⲉ ⲙ̅ⲙⲟϥ ⲡⲉ ⲉⲃⲟⲗ <text:line-break/><text:span text:style-name="T1"> </text:span><text:span text:style-name="T2">(36/30) </text:span> ϩⲓⲧⲟⲟⲧϥ ⲙ̣̅[ⲡⲓⲁⲧⲧⲉϩ]ⲟ̣ϥ· ⲟⲩⲁⲧⲛⲁⲩ ⲉ <text:line-break/><text:span text:style-name="T1"> </text:span><text:span text:style-name="T2">(36/31) </text:span> ⲣⲟϥ ⲡⲉ [̅ⲛ̅ⲛⲁⲓ̈ ⲧⲏⲣⲟⲩ ⲉⲧⲟ]ⲩⲟⲛϩ ⲉⲃⲟⲗ̓ <text:line-break/><text:span text:style-name="T1"> </text:span><text:span text:style-name="T2">(36/32) </text:span> ϩⲙ̅ ⲡⲧⲏⲣϥ [ⲟ]ⲩⲟ[ⲉⲓⲛⲉ ⲡⲉ ⲉ]ϥ̣[ϣ]ⲟ̣ⲟⲡ ϩⲛ̅ <text:line-break/><text:span text:style-name="T1"> </text:span><text:span text:style-name="T2">(36/33) </text:span> ⲟⲩⲟⲉⲓⲛⲉ ⲁⲛⲟⲛ ⲡ̣[ⲉ ϩⲱⲱⲛ ⲉⲧⲁϩⲃⲱ]ⲗ̓ <text:line-break/><text:span text:style-name="T1"> </text:span><text:span text:style-name="T2">(36/34) </text:span> ⲟⲩⲁⲁⲧⲛ̅ ⲉⲃ̣ⲟ̣[ⲗ̓ ϩⲙ̅ ⲡⲕⲟⲥⲙⲟⲥ ⲉⲧⲟⲩ]ⲟ̣ⲛϩ̣ <text:line-break/><text:span text:style-name="T1"> </text:span><text:span text:style-name="T2">(36/35) </text:span> ⲉⲃⲟⲗ ⲉⲛⲛ̣[ⲟⲩϩⲙ̅ ⲉⲃⲟⲗ ϩⲓⲧⲛ̅ ⲧⲙ̅ⲛ̅ⲧ̅ⲣⲙ̅ⲛ̅] <text:line-break/><text:span text:style-name="T1"> </text:span><text:span text:style-name="T2">(36/36) </text:span> ϩⲏⲧ· ⲉⲧϩⲏⲡ̣ [ⲉⲃⲟⲗ ϩⲓⲧⲟⲟⲧϥ’ ⲙ̅ⲡϩⲣⲟⲟⲩ] <text:line-break/><text:span text:style-name="T1"> </text:span><text:span text:style-name="T2">(37/1) </text:span> ⲛ̅ⲁⲧϣⲁϫⲉ ⲙ̅ⲙⲟϥ ⲛ̣̅[ⲁ]ⲧ̣ϣⲓ̣ⲧ̣ϥ̣̓ ⲁⲩ̣ⲱ ⲡⲉⲧⲛ̅ <text:line-break/><text:span text:style-name="T1"> </text:span><text:span text:style-name="T2">(37/2) </text:span> ϩⲣⲁⲓ̈ ⲛ̅ϩⲏⲧⲛ̅ ⲉⲧϩⲏⲡ ϥ̣ϯ ⲛ̅ⲙⲫⲟⲣⲟⲥ ⲛ̅ⲛⲉϥⲕⲁⲣ <text:line-break/><text:span text:style-name="T1"> </text:span><text:span text:style-name="T2">(37/3) </text:span> ⲡ̣ⲟⲥ ⲁⲧⲟⲟⲧϥ· ⲙ̅ⲡ̣ⲙ̣ⲟⲟⲩ ⲙ̅ⲡⲱⲛϩ ⲧⲟⲧⲉ ϭⲉ <text:line-break/><text:span text:style-name="T1"> </text:span><text:span text:style-name="T2">(37/4) </text:span> ⲡϣⲏⲣⲉ ⲉⲧϫⲏⲕ%6 ⲉⲃⲟⲗ ϩⲛ̅ ϩⲱⲃ ⲛⲓⲙ ⲉⲧⲉ ⲡⲁⲓ̈ <text:line-break/><text:span text:style-name="T1"> </text:span><text:span text:style-name="T2">(37/5) </text:span> ⲡⲉ ⲡⲗⲟⲅⲟⲥ ⲉⲧⲁϩϣⲱⲡⲉ ⲉⲃⲟⲗ ϩⲓⲧⲛ̅ ⲡⲓ <text:line-break/><text:span text:style-name="T1"> </text:span><text:span text:style-name="T2">(37/6) </text:span> ϩⲣⲟⲟⲩ ⲉⲁϥⲣ̅ϣⲟⲣⲡ%6 ⲛ̅ⲉⲓ ⲉⲃⲟⲗ ⲙ̅ⲡϫⲓⲥⲉ ⲉⲩ <text:line-break/><text:span text:style-name="T1"> </text:span><text:span text:style-name="T2">(37/7) </text:span> ⲛ̅ⲧⲁϥ ⲙ̅ⲙⲁⲩ ⲙ̅ⲡⲣⲁⲛ ⲛ̅ϩⲣⲁⲓ̈ ⲛ̅ϩⲏⲧϥ̓ ⲉϥⲟ ⲛ̅ <text:line-break/><text:span text:style-name="T1"> </text:span><text:span text:style-name="T2">(37/8) </text:span> ⲟⲩⲟⲉⲓⲛⲉ ⲁϥⲟⲩ〈ⲱ〉ⲛϩ ⲉⲃⲟⲗ ⲛ̅ⲛⲓⲁⲧϩⲁⲏ ⲁⲩ <text:line-break/><text:span text:style-name="T1"> </text:span><text:span text:style-name="T2">(37/9) </text:span> ⲱ ⲛⲓⲁⲧⲥⲟⲩⲱⲛⲟⲩ ⲧⲏⲣⲟⲩ ⲁⲩⲥⲟⲩⲱⲛⲟⲩ <text:line-break/><text:span text:style-name="T1"> </text:span><text:span text:style-name="T2">(37/10) </text:span> ⲁⲩⲱ ⲛⲁⲓ̈ ⲉⲧⲙⲟⲕϩ ⲛ̅ⲣ̅ϩⲉⲣⲙⲏⲛⲉⲩⲉ ⲙ̅ⲙⲟ <text:line-break/><text:span text:style-name="T1"> </text:span><text:span text:style-name="T2">(37/11) </text:span> ⲟⲩ ⲙⲛ̅ ⲛⲉⲑⲏⲡ· ⲁϥⲟⲩⲟⲛϩⲟⲩ ⲉⲃⲟⲗ ⲁⲩⲱ <text:line-break/><text:span text:style-name="T1"> </text:span><text:span text:style-name="T2">(37/12) </text:span> ⲛⲉⲧϣⲟⲟⲡ̓ ϩⲛ̅ ⲟⲩⲙⲛⲧ̓ⲕⲁⲣⲱⲥ ⲙⲛ̅ ⲡϣⲟⲣⲡ̓ <text:line-break/><text:span text:style-name="T1"> </text:span><text:span text:style-name="T2">(37/13) </text:span> ⲙ̅ⲙⲉⲉⲩⲉ ⲁϥⲧⲁϣⲉ̣ ⲟⲉⲓϣ ⲛⲁⲩ ⲁⲩⲱ ⲛⲉⲧϣⲟ <text:line-break/><text:span text:style-name="T1"> </text:span><text:span text:style-name="T2">(37/14) </text:span> ⲟⲡ ϩⲙ̅ ⲡⲕⲁⲕⲉ ⲁϥⲟⲩⲟⲛϩϥ̓ ⲉⲃⲟⲗ ⲛⲁⲩ ⲁⲩⲱ <text:line-break/><text:span text:style-name="T1"> </text:span><text:span text:style-name="T2">(37/15) </text:span> ⲛ̣ⲉⲧϣⲟⲟⲡ̓ ϩⲙ̅ ⲡⲛⲟⲩⲛ ⲁϥⲧⲁⲙⲟⲟⲩ ⲉⲣⲟϥ̓ <text:line-break/><text:span text:style-name="T1"> </text:span><text:span text:style-name="T2">(37/16) </text:span> ⲁⲩⲱ ⲛⲉⲧϣⲟⲟⲡ%6 ϩⲛ̅ ⲛⲉϩⲱⲣ ⲉⲧϩⲏⲡ· ⲁϥϫⲱ <text:line-break/><text:span text:style-name="T1"> </text:span><text:span text:style-name="T2">(37/17) </text:span> ⲉⲣⲟⲟⲩ ⲛⲙ̣̅ⲙⲩⲥⲧⲏⲣⲓⲟⲛ ⲛ̅ⲁⲧϣⲁϫⲉ ⲙ̅ⲙⲟ <text:line-break/><text:span text:style-name="T1"> </text:span><text:span text:style-name="T2">(37/18) </text:span> ⲟⲩ ⲁⲩ̣[ⲱ] ⲛ̣̅ⲥⲃⲟⲟⲩⲉ ⲛ̅ⲁⲧⲟⲩⲁϩⲙⲟⲩ ⲁϥⲧⲥⲉⲃⲟ <text:line-break/><text:span text:style-name="T1"> </text:span><text:span text:style-name="T2">(37/19) </text:span> ⲟⲩ ⲁⲛⲉⲛⲧⲁⲩϣⲱⲡⲉ ⲧⲏⲣⲟⲩ ⲛ̅ϣⲏⲣⲉ ⲙ̅ <text:line-break/><text:span text:style-name="T1"> </text:span><text:span text:style-name="T2">(37/20) </text:span> ⲡⲟⲩⲟⲉⲓⲛⲉ ⲡϩⲣⲁⲩ ⲛ̅ⲇⲉ ⲉⲛⲧⲁϥϣⲱⲡⲉ ⲉ <text:line-break/><text:span text:style-name="T1"> </text:span><text:span text:style-name="T2">(37/21) </text:span> ⲃⲟⲗ ϩⲙ̅ ⲡⲁⲙⲉⲉⲩⲉ ⲉϥϣⲟⲟⲡ̓ ⲛ̅ϣⲟⲙⲧⲉ ⲙ̅ <text:line-break/><text:span text:style-name="T1"> </text:span><text:span text:style-name="T2">(37/22) </text:span> ⲙⲟⲛⲏ ⲡⲓⲱⲧ̓ ⲧⲙⲁⲁⲩ ⲡϣⲏⲣⲉ ⲟⲩⲥⲙⲏ ⲉⲥ <text:line-break/><text:span text:style-name="T1"> </text:span><text:span text:style-name="T2">(37/23) </text:span> ϣⲟⲟⲡ ϩⲛ̅ ⲟⲩⲁⲓⲥⲑⲏⲥⲓⲥ ⲟⲩⲛ̅ⲧⲉϥ ⲙ̅ⲙⲁⲩ ⲛ̅ <text:line-break/><text:soft-page-break/><text:span text:style-name="T1"> </text:span><text:span text:style-name="T2">(37/24) </text:span> ⲟⲩⲗⲟⲅⲟⲥ ϩⲣⲁⲓ̈ ⲛ̅ϩⲏⲧϥ· ⲡⲁⲓ̈ ⲉⲧⲉⲩⲛ̅ⲧⲁϥ̓ ⲙ̅ⲙⲁⲩ <text:line-break/><text:span text:style-name="T1"> </text:span><text:span text:style-name="T2">(37/25) </text:span> ⲛ̅⟦ⲟⲩⲉ⟧〈ⲉ〉ⲟⲟⲩ ⲛⲓⲙ ⲁⲩⲱ ⲟⲩⲛ̅ⲧⲉϥ ⲙ̅ⲙⲁⲩ̓ ⲛ̅ <text:line-break/><text:span text:style-name="T1"> </text:span><text:span text:style-name="T2">(37/26) </text:span> ϣⲟⲙⲧⲉ ⲙ̅ⲙⲛⲧϩⲟⲟⲩⲧ· ⲁⲩⲱ ϣⲟⲙⲧⲉ ⲛ̅ⲇⲩ <text:line-break/><text:span text:style-name="T1"> </text:span><text:span text:style-name="T2">(37/27) </text:span> ⲛⲁⲙⲓⲥ ⲁⲩⲱ ϣⲟⲙⲧ ⲛ̅ⲣⲁⲛ ⲉⲩϣⲟⲟⲡ̓ ⲙ̅ⲡⲉ <text:line-break/><text:span text:style-name="T1"> </text:span><text:span text:style-name="T2">(37/28) </text:span> ⲉⲓⲣⲏⲧⲉ ⲙ̅ⲡϣⲁⲙⲧ· ʹ31ʹ31ʹ31 ⲉⲩⲱ ⲛ̅ϥⲧⲟⲩ ⲕⲟ <text:line-break/><text:span text:style-name="T1"> </text:span><text:span text:style-name="T2">(37/29) </text:span> ⲟϩ ϩⲛ̅ ⲟⲩⲡⲉⲧϩⲏⲡ ϩⲣⲁ̣[ⲓ̈ ϩ]ⲛ̣̅ ⲟⲩⲙⲛ̅ⲧⲕⲁⲣⲱⲥ <text:line-break/><text:span text:style-name="T1"> </text:span><text:span text:style-name="T2">(37/30) </text:span> ⲙ̅ⲡⲓⲁⲧϣⲁϫⲉ ⲙ̣̅ⲙ̣[ⲟϥ ⲛ̅ⲧⲟϥ ⲟ]ⲩ̣ⲁⲁⲧϥ̓ ⲉⲧⲁϩϣⲱ <text:line-break/><text:span text:style-name="T1"> </text:span><text:span text:style-name="T2">(37/31) </text:span> ⲡⲉ ⲉⲧⲉ ⲡⲁⲉⲓ̣ [ⲡⲉ ⲡⲉⲭ̅ⲥ̅ ⲁⲩⲱ] ⲁⲛⲟⲕ̓ ⲛ̅ⲧⲁⲓ̈ⲧⲁϩⲥ̅ϥ̅ <text:line-break/><text:span text:style-name="T1"> </text:span><text:span text:style-name="T2">(37/32) </text:span> ⲙ̅ⲡⲉⲟⲟⲩ [ⲛ̅ⲧⲉ ⲡⲡ̅ⲛ̅ⲁ̅ ⲛ̅ⲁ]ⲧ̣ⲛ̣ⲁⲩ ⲉⲣⲟϥ ϩⲛ̅ <text:line-break/><text:span text:style-name="T1"> </text:span><text:span text:style-name="T2">(37/33) </text:span> ⲟⲩⲙⲛ̅ⲧ̣̅̅[ⲭ̅ⲥ̅ ⲡⲓϣⲟ]ⲙ̣ⲧ̣ ϭⲉ ⲁ̣ⲉⲓⲧⲉϩⲟϥ ⲉⲣⲁⲧϥ̅ <text:line-break/><text:span text:style-name="T1"> </text:span><text:span text:style-name="T2">(37/34) </text:span> ⲟⲩ̣ⲁ̣[ⲁⲧϥ̓ ϩⲛ̅ ⲟⲩⲉⲟⲟⲩ ⲛ̅]ϣ̣ⲁⲉⲛⲉϩ ⲉϩⲣⲁⲓ̈ ⲉ <text:line-break/><text:span text:style-name="T1"> </text:span><text:span text:style-name="T2">(37/35) </text:span> ϫ[ⲛ̅ ⲛⲁⲓⲱⲛ ϩⲣⲁⲓ̈ ϩⲙ̅ ⲡⲓⲙⲟⲟⲩ] ⲉⲧⲟⲛϩ ⲉⲧⲉ ⲡⲁⲓ̈ <text:line-break/><text:span text:style-name="T1"> </text:span><text:span text:style-name="T2">(37/36) </text:span> [ⲡⲉ ⲡⲉⲟⲟⲩ ⲡⲁⲓ̈ ⲉⲧⲕⲱⲧⲉ ⲉⲣⲟ]ϥ̣’ 1̅6vacat̅16 <text:line-break/><text:span text:style-name="T1"> </text:span><text:span text:style-name="T2">(38/1) </text:span> ⲡⲁⲓ̈ ⲉⲛⲧ̣[ⲁ]ϥ̣ⲣ̣̅ϣ̣ⲟ̣ⲣ̣ⲡ̣ ⲙ̣̅ⲡⲣ̅ⲣⲓⲉ ⲙ̅ⲡⲟⲩⲟⲉⲓⲛ <text:line-break/><text:span text:style-name="T1"> </text:span><text:span text:style-name="T2">(38/2) </text:span> ⲛ̅ⲛⲓⲁⲓⲱⲛ ⲉⲧϫⲟⲥⲉ ⲁ̣ⲩⲱ ϩⲣⲁⲓ̈ ϩⲛ̅ ⲟⲩⲟⲉⲓⲛ <text:line-break/><text:span text:style-name="T1"> </text:span><text:span text:style-name="T2">(38/3) </text:span> ⲛ̅ⲉⲟⲟⲩ ϩⲛ̅ ⲟⲩⲧⲁϫ[ⲣ]ⲟ̣ ⲉϥⲙⲏⲛ̓ ⲉⲃⲟⲗ ⲁⲩⲱ ⲁ̣[ϥ] <text:line-break/><text:span text:style-name="T1"> </text:span><text:span text:style-name="T2">(38/4) </text:span> ⲱϩⲉ ⲉⲣⲁⲧϥ̅ ϩⲙ̅ ⲡϥⲟⲩⲟⲉⲓⲛ ⲙ̅ⲙⲓⲛ ⲙ̅ⲙⲟ[ϥ] <text:line-break/><text:span text:style-name="T1"> </text:span><text:span text:style-name="T2">(38/5) </text:span> ⲡⲁⲓ̈ ⲉⲧⲕⲱⲧⲉ ⲉⲣⲟϥ ⲉⲧⲉ ⲡⲁⲓ̈ ⲡⲉ ⲡⲃⲁⲗ̓ ⲙ̅ⲡ[ⲟⲩ] <text:line-break/><text:span text:style-name="T1"> </text:span><text:span text:style-name="T2">(38/6) </text:span> ⲟⲉⲓⲛ ⲉⲧⲣ̅ⲟⲩⲟⲉⲓⲛ ⲉⲣⲟⲉⲓ ϩⲣⲁⲓ̈ ϩⲛ̅ ⲟⲩⲉⲟⲟ[ⲩ] <text:line-break/><text:span text:style-name="T1"> </text:span><text:span text:style-name="T2">(38/7) </text:span> ⲁϥϯ ⲁⲓⲱⲛ ⲙ̅ⲡⲓⲱⲧ%6 ⲛ̅〈ⲛ〉ⲁⲓⲱⲛ ⲧⲏⲣⲟⲩ ⲉⲧⲉ [ⲁ] <text:line-break/><text:span text:style-name="T1"> </text:span><text:span text:style-name="T2">(38/8) </text:span> ⲛⲟⲕ ⲡⲉ ⲡⲙⲉⲉⲩⲉ ⲙ̅ⲡⲓⲱⲧ· ⲛ̅ⲧⲡⲣⲱⲧⲉⲛ <text:line-break/><text:span text:style-name="T1"> </text:span><text:span text:style-name="T2">(38/9) </text:span> ⲛⲟⲓⲁ ⲉⲧⲉ ⲡⲁⲓ̈ ⲡⲉ ⲃⲁⲣⲃⲏⲗⲱ ⲡⲉⲟⲟⲩ ⲉⲧϫ[ⲏⲕ] <text:line-break/><text:span text:style-name="T1"> </text:span><text:span text:style-name="T2">(38/10) </text:span> ⲉⲃⲟⲗ ⲁⲩⲱ ⲡⲁⲧ̓ⲛⲁⲩ ⲉⲣⲟϥ ⲉϥϩⲏⲡ· ⲛ̅ⲁⲧϣ[ⲓⲧϥ’] <text:line-break/><text:span text:style-name="T1"> </text:span><text:span text:style-name="T2">(38/11) </text:span> ⲁⲛⲟⲕ ⲡⲉ ⲑⲓⲕⲱⲛ ⲙ̅ⲡⲡⲛ̅ⲁ̅ ⲛ̅ⲁⲧ̓ⲛⲁⲩ ⲉⲣⲟ[ϥ] <text:line-break/><text:span text:style-name="T1"> </text:span><text:span text:style-name="T2">(38/12) </text:span> ⲁⲩⲱ ⲛ̅ⲧⲁⲡⲧⲏⲣϥ̓ ϫⲓ ϩⲓⲕⲱⲛ ⲉⲃⲟⲗ ϩⲓⲧⲟⲟⲧ <text:line-break/><text:span text:style-name="T1"> </text:span><text:span text:style-name="T2">(38/13) </text:span> ⲁⲩⲱ ⲧⲙⲁⲁⲩ ⲡⲟⲩⲟⲉ̣ⲓⲛⲉ ⲡⲁⲓ̈ ⲉⲛⲧⲁⲥⲕⲁⲁϥ̣ <text:line-break/><text:span text:style-name="T1"> </text:span><text:span text:style-name="T2">(38/14) </text:span> ⲉϥⲟⲉⲓ· ⲙ̅ⲡⲁⲣⲑⲉⲛⲟⲥ ⲧⲁⲓ̈ ⲉⲧⲟⲩⲙⲟⲩⲧ[ⲉ] <text:line-break/><text:span text:style-name="T1"> </text:span><text:span text:style-name="T2">(38/15) </text:span> ⲉⲣⲟⲥ ϫⲉ ⲙ̅ⲉ̅ⲓ̅ⲣ̅ⲟ̅ⲑ̅ⲉ̅ⲁ̅ ⲧⲟⲧⲉ ⲛ̅ⲧⲁ’ⲧⲉⲡ̣ⲟⲥ ⲡ̣ϩ̣ⲣ̣[ⲟ] <text:line-break/><text:span text:style-name="T1"> </text:span><text:span text:style-name="T2">(38/16) </text:span> ⲟⲩ ⲛ̅ⲁⲧ%6ⲉⲙⲁϩⲧⲉ ⲙ̅ⲙⲟϥ· ⲁⲩⲱ ⲛ̅ⲁⲧϣⲓⲧϥ̅ ⲧⲟⲧⲉ <text:line-break/><text:span text:style-name="T1"> </text:span><text:span text:style-name="T2">(38/17) </text:span> ⲡⲧⲉⲗⲉⲓⲟⲥ ⲛ̅ϣⲏⲣⲉ ⲁϥⲟⲩⲟⲛϩϥ ⲉⲃⲟⲗ ⲛ̅ⲛⲉϥ <text:line-break/><text:span text:style-name="T1"> </text:span><text:span text:style-name="T2">(38/18) </text:span> ⲁⲓⲱⲛ ⲛⲁⲓ̈ ⲉⲛⲧⲁⲩϣⲱⲡⲉ ⲉⲃⲟⲗ̣ ϩ̣ⲓ̣ⲧ̣ⲟⲟⲧϥ’ <text:line-break/><text:span text:style-name="T1"> </text:span><text:span text:style-name="T2">(38/19) </text:span> ⲁϥⲟⲩⲟⲛϩⲟⲩ ⲉⲃⲟⲗ ⲁϥϯ ⲛⲁⲩ ⲛ̅ⲟⲩⲉⲟⲟⲩ ⲁⲩⲱ <text:line-break/><text:span text:style-name="T1"> </text:span><text:span text:style-name="T2">(38/20) </text:span> ⲁϥϯ ⲛⲁⲩ ⲛ̅ϩⲉⲛⲑⲣⲟⲛⲟⲥ ⲁϥⲱϩⲉ ⲉⲣⲁⲧϥ̅ →ϩ←ⲙ̅ <text:line-break/><text:span text:style-name="T1"> </text:span><text:span text:style-name="T2">(38/21) </text:span> ⲡⲉⲟⲟⲩ ⲡⲁⲓ̈ ⲉⲧⲁϥϯ ⲉⲟⲟⲩ ⲛⲁϥ̓ ϩⲣⲁⲓ̈ ⲛ̅ϩⲏⲧϥ’ <text:line-break/><text:span text:style-name="T1"> </text:span><text:span text:style-name="T2">(38/22) </text:span> ⲁⲩⲥⲙⲟⲩ ⲁⲡⲧⲉⲗⲓⲟⲥ ⲛ̅ϣⲏⲣⲉ ⲡⲉⲭⲥ̅ ⲡⲛⲟⲩⲧⲉ <text:line-break/><text:span text:style-name="T1"> </text:span><text:span text:style-name="T2">(38/23) </text:span> ⲡⲁⲓ̈ ⲉⲛⲧⲁϥϣⲱⲡⲉ ⲟⲩⲁⲁⲧϥ· ⲁⲩⲱ ⲁⲩϯ ⲉⲟⲟⲩ <text:line-break/><text:span text:style-name="T1"> </text:span><text:span text:style-name="T2">(38/24) </text:span> ⲉⲩϫⲱ ⲙ̅ⲙⲟⲥ ϫⲉ ϥϣⲟⲟⲡ ϥϣⲟⲟⲡ ⲡϣⲏ <text:line-break/><text:span text:style-name="T1"> </text:span><text:span text:style-name="T2">(38/25) </text:span> ⲣⲉ ⲙ̅ⲡⲛⲟⲩⲧⲉ ⲡϣⲏⲣⲉ ⲙ̅ⲡⲛⲟⲩⲧⲉ ⲛ̅ⲧⲟϥ ⲡⲉ̣[ⲧ]’ <text:line-break/><text:span text:style-name="T1"> </text:span><text:span text:style-name="T2">(38/26) </text:span> ϣⲟⲟⲡ· ⲡⲁⲓⲱⲛ ⲛ̅ⲧⲉ ⲛⲁⲓⲱⲛ ⲉϥϭⲁϣⲧ̓ ⲁⲛⲁ[ⲓ] <text:line-break/><text:span text:style-name="T1"> </text:span><text:span text:style-name="T2">(38/27) </text:span> ⲱⲛ ⲛⲁⲉⲓ ⲉⲛⲧⲁϥϫⲡⲟⲟⲩ ϫⲉ ⲛ̅ⲧⲟⲕ ⲛ̅ⲅⲁⲣ ⲁ[ⲕ] <text:line-break/><text:span text:style-name="T1"> </text:span><text:span text:style-name="T2">(38/28) </text:span> ϫⲡⲟ ϩⲙ̅ ⲡⲉⲕⲟⲩⲱϣⲉ ⲟⲩⲁⲁⲧⲕ ⲉⲧⲃⲉ ⲡⲁⲓ̈ ⲧ̣[ⲛ̅] <text:line-break/><text:span text:style-name="T1"> </text:span><text:span text:style-name="T2">(38/29) </text:span> ϯ ⲉⲟ̣ⲟⲩ ⲛⲁⲕ· ⲙ̅ⲁ̣̅̅ ⲙ̅ⲱ̅ ⲱ̅ ⲱ̅ ⲱ̅ ⲉ̅ⲓⲁ̅ ⲉ̅ⲓ̅ ⲟ̅ⲛ̅ ⲉ̅ⲓ̅ ⲡ[ⲓⲁⲓ] <text:line-break/><text:span text:style-name="T1"> </text:span><text:span text:style-name="T2">(38/30) </text:span> ⲱⲛ ⲛ̅ⲧⲉ ⲛⲁ̣[ⲓⲱⲛ ⲡ]ⲁ̣ⲓ̣ⲱⲛ ⲛ̅ⲧⲁϥⲧⲁⲉⲓϥ ⲧⲟⲧⲉ̣ <text:line-break/><text:span text:style-name="T1"> </text:span><text:span text:style-name="T2">(38/31) </text:span> ⲛ̅ⲧⲟϥ ⲡⲛⲟ[ⲩⲧⲉ ⲉⲛⲧⲁⲩ]ϫ̣ⲡⲟϥ ⲁϥϯ ⲛⲁⲩ ⲛ̅ <text:line-break/><text:span text:style-name="T1"> </text:span><text:span text:style-name="T2">(38/32) </text:span> ⲟⲩϭⲟⲙ ⲛ̣̅[ⲱⲛϩ ⲉⲧⲣⲉⲩⲧⲁϫ]ⲣⲟ ⲉⲣⲟⲥ ⲁⲩⲱ ⲁ[ϥ] <text:line-break/><text:span text:style-name="T1"> </text:span><text:span text:style-name="T2">(38/33) </text:span> ⲧⲉϩⲟ ⲙ̅ⲙ[ⲟⲟⲩ ϩⲙ̅ ⲡⲟⲩⲙⲁ ⲡ]ϣ̣[ⲟ]ⲣ̣ⲡ ⲙⲉⲛ̓ ⲛ̅ <text:line-break/><text:span text:style-name="T1"> </text:span><text:span text:style-name="T2">(38/34) </text:span> ⲁⲓⲱⲛ ⲁϥⲧⲉϩⲟ̣[ϥ̓ ⲉϩⲣⲁⲓ̈ ⲉϫⲙ̅ ⲡϣⲟ]ⲣ̣ⲡ· ⲁ̅ⲣ̅ⲙ̅ⲏ̣̅̅ <text:line-break/><text:soft-page-break/><text:span text:style-name="T1"> </text:span><text:span text:style-name="T2">(38/35) </text:span> ⲇ̅ⲱ̅ⲛ̅ ⲛⲟ̅ⲩⲥ̣̅ⲁ̣[ⲛⲓⲟⲛ ⲁⲣⲙⲟⲍⲏⲗ ⲡⲙⲁϩ]ⲥⲛⲁⲩ̣ <text:line-break/><text:span text:style-name="T1"> </text:span><text:span text:style-name="T2">(38/36) </text:span> ⲁϥⲧ̣ⲉϩⲟϥ%6 [ⲉϩⲣⲁⲓ̈ ⲉϫⲙ̅ ⲡⲙⲁϩⲥⲛⲁⲩ ⲛ̅ⲁⲓⲱⲛ] <text:line-break/><text:span text:style-name="T1"> </text:span><text:span text:style-name="T2">(39/1) </text:span> ⲫⲁ̅ⲓ̅ⲟ̅ⲛⲓ̅ⲟⲛ̅ ⲁ̅ⲓⲛⲓⲟⲛ̅ ⲟ̅ⲣⲟⲓⲁⲏⲗ̅ ⲡⲙⲁϩϣⲟⲙⲧ%6 <text:line-break/><text:span text:style-name="T1"> </text:span><text:span text:style-name="T2">(39/2) </text:span> ⲉϩⲣⲁⲓ̈ ⲉϫⲙ̅ ⲡⲙⲁϩϣⲟⲙⲧ ⲛ̅ⲁⲓⲱⲛ ⲙⲉ̅ⲗ̅ⲗ̅ⲉ̅ⲫ̅ⲁ̅ <text:line-break/><text:span text:style-name="T1"> </text:span><text:span text:style-name="T2">(39/3) </text:span> ⲛ̅ⲉ̅ⲁ̅· ⲗⲱ̅ⲓⲟⲛ̅ ⲇⲁⲩ̅ⲉⲓⲑⲁⲓ̅ ⲡⲙⲉϩϥⲧⲟⲟⲩ ⲉϩ <text:line-break/><text:span text:style-name="T1"> </text:span><text:span text:style-name="T2">(39/4) </text:span> ⲣⲁⲓ̈ ⲉϫⲙ̅ ⲡⲙⲉϩϥⲧⲟⲟⲩ ⲙⲟ̅ⲩ̅ⲥ̅ⲁ̅ⲛ̅ⲓ̅ⲟ̅ⲛ ⲁⲙⲉ <text:line-break/><text:span text:style-name="T1"> </text:span><text:span text:style-name="T2">(39/5) </text:span> ⲑⲏⲛ̓ ⲏⲗ̅ⲏ̅ⲗ̅ⲏ̅ⲑ̅ ⲛ→ⲓ←ⲁⲓⲱⲛ ϭⲉ ⲉⲛⲧⲁⲩϫⲡⲟⲟⲩ <text:line-break/><text:span text:style-name="T1"> </text:span><text:span text:style-name="T2">(39/6) </text:span> ⲉⲃⲟⲗ ϩⲓⲧⲟⲟⲧϥ̅ ⲙ̅ⲡⲛⲟⲩⲧⲉ ⲛ̅ⲧⲁⲩϫⲡⲟϥ ⲡⲉ <text:line-break/><text:span text:style-name="T1"> </text:span><text:span text:style-name="T2">(39/7) </text:span> ⲭⲥ̅ ⲛⲁⲓ̈ ⲇⲉ ⲁⲩϯ ⲛⲁⲩ ⲛ̅ⲟⲩⲉⲟⲟⲩ ⲁⲩⲱ ⲁⲩϯ ⲉⲟ <text:line-break/><text:span text:style-name="T1"> </text:span><text:span text:style-name="T2">(39/8) </text:span> ⲟⲩ ϩⲱⲟⲩ ⲛ̅ϭⲓ ⲛⲁⲓⲱⲛ ⲁⲩⲣ̅ϣⲣⲡ%6 ⲛ̅ⲟⲩⲱⲛϩ <text:line-break/><text:span text:style-name="T1"> </text:span><text:span text:style-name="T2">(39/9) </text:span> ⲉⲃⲟⲗ ⲉⲩϫⲟⲥⲉ ϩⲙ̅ ⲡⲟⲩⲙⲉⲉⲩⲉ ⲁⲩⲱ ⲡⲟⲩⲁ <text:line-break/><text:span text:style-name="T1"> </text:span><text:span text:style-name="T2">(39/10) </text:span> ⲡⲟⲩⲁ ⲛ̅ⲁⲓⲱⲛ ⲉⲩϯ ⲛ̅ϩⲉⲛⲧⲃⲁ ⲛ̅ⲉⲟⲟⲩ ϩⲣⲁⲓ̈ <text:line-break/><text:span text:style-name="T1"> </text:span><text:span text:style-name="T2">(39/11) </text:span> ϩⲛ̅ ϩⲉⲛⲛⲟϭ ⲛ̅ⲟⲩⲟⲉⲓⲛⲉ ⲛ̅ⲁⲧⲛ̅ⲣⲁⲁⲧⲟⲩ ⲁⲩ <text:line-break/><text:span text:style-name="T1"> </text:span><text:span text:style-name="T2">(39/12) </text:span> [ⲱ] ⲁⲩⲥⲙⲟⲩ ⲧⲏⲣⲟⲩ ⲙⲛ̅ ⲛⲟⲩⲉⲣⲏⲩ ⲁⲡϣⲏⲣⲉ <text:line-break/><text:span text:style-name="T1"> </text:span><text:span text:style-name="T2">(39/13) </text:span> ⲛ̅ⲧⲉⲗⲓⲟⲥ ⲡⲛⲟⲩⲧⲉ ⲛ̅ⲧⲁⲩϫⲡⲟϥ ⲧⲟⲧⲉ ⲁϥ <text:line-break/><text:span text:style-name="T1"> </text:span><text:span text:style-name="T2">(39/14) </text:span> ⲉⲓ ⲉⲃⲟⲗ ⲛ̅ϭⲓ ⲟⲩⲗⲟⲅ̣ⲟⲥ ⲉⲃⲟⲗ ϩⲙ̅ ⲡⲛⲟϭ ⲛ̅ <text:line-break/><text:span text:style-name="T1"> </text:span><text:span text:style-name="T2">(39/15) </text:span> ⲟⲩⲟⲉⲓⲛ ⲏⲗ̅ⲏ̅ⲗ̅ⲏ̅ⲑ̅ ⲁⲩⲱ ⲡⲁϫⲉϥ ϫⲉ ⲁⲛⲟⲕ%6 <text:line-break/><text:span text:style-name="T1"> </text:span><text:span text:style-name="T2">(39/16) </text:span> ⲡⲉ ⲡⲣ̅ⲣⲟ ⲛⲓⲙ ⲡⲉ ⲡⲁⲡⲭⲁⲟⲥ ⲁⲩⲱ ⲛⲓⲙ ⲡⲉ <text:line-break/><text:span text:style-name="T1"> </text:span><text:span text:style-name="T2">(39/17) </text:span> ⲡⲁⲉⲙ̅ⲛ̅ⲧⲉ ⲁⲩⲱ ⲛ̅ⲧⲟⲩⲛⲟⲩ ⲉⲧⲙ̅ⲙⲁⲩ ⲁⲡϥⲟⲩ <text:line-break/><text:span text:style-name="T1"> </text:span><text:span text:style-name="T2">(39/18) </text:span> ⲟⲉⲓⲛⲉ ⲟⲩⲱⲛϩ ⲉⲃⲟⲗ ⲉϥⲡⲣ̅ⲣⲓⲱⲟⲩ ⲉⲩⲛ̅ⲧⲁϥ̓ <text:line-break/><text:span text:style-name="T1"> </text:span><text:span text:style-name="T2">(39/19) </text:span> ⲙ̅ⲙⲁ[ⲩ ⲛ̅]ⲧⲉⲡⲓⲛⲟⲓⲁ ⲙ̅ⲡⲟⲩⲥⲡⲥⲱⲡϥ̅ ⲛ̅ϭⲓ <text:line-break/><text:span text:style-name="T1"> </text:span><text:span text:style-name="T2">(39/20) </text:span> ⲛ̅ϭⲁⲙ ⲛ̅ⲧⲉ ⲛ̅ϭⲁⲙ ⲁⲩⲱ ⲛ̅ⲧⲟⲩⲛⲟⲩ ϩⲱⲱϥ’ <text:line-break/><text:span text:style-name="T1"> </text:span><text:span text:style-name="T2">(39/21) </text:span> ⲁϥⲟⲩⲱⲛϩ ⲉⲃⲟⲗ ⲛ̅ϭⲓ ⲡⲛⲟϭ ⲛ̅ⲇⲁⲓⲙⲟⲛⲓ <text:line-break/><text:span text:style-name="T1"> </text:span><text:span text:style-name="T2">(39/22) </text:span> ⲟⲛ ⲡⲁⲓ̈ ⲉⲧⲁⲣⲭⲉⲓ ⲁϫⲙ̅ ⲡⲥⲁⲙⲡⲓⲧ̅ⲛ̅ ⲛ̅ⲉ <text:line-break/><text:span text:style-name="T1"> </text:span><text:span text:style-name="T2">(39/23) </text:span> ⲙⲛ̅ⲧⲉ ⲙⲛ̅ ⲡⲭⲁⲟⲥ ⲉⲙⲛ̅ⲧⲉϥ ⲙⲟⲣⲫⲏ ⲙ̅ <text:line-break/><text:span text:style-name="T1"> </text:span><text:span text:style-name="T2">(39/24) </text:span> ⲙⲁⲩ ⲟⲩⲇⲉ 〈ⲉ〉ϥϫⲏⲕ̓ ⲉⲃⲟⲗ ⲁⲛ ⲁⲗⲗⲁ ⲉⲩⲛ̅ⲧⲁϥ%6 <text:line-break/><text:span text:style-name="T1"> </text:span><text:span text:style-name="T2">(39/25) </text:span> ⲙ̅ⲙⲁⲩ ⲛ̅ⲧⲙⲟⲣⲫⲏ ⲙ̅ⲡⲉⲟⲟⲩ ⲛ̅ⲛⲁⲉⲓ ⲉⲛ <text:line-break/><text:span text:style-name="T1"> </text:span><text:span text:style-name="T2">(39/26) </text:span> ⲧⲁⲩϫⲡⲟⲟⲩ ϩⲙ̅ ⲡⲕⲁⲕⲉ ⲡⲁⲓ̈ ϭⲉ ⲉⲩⲙⲟⲩⲧⲉ ⲉ <text:line-break/><text:span text:style-name="T1"> </text:span><text:span text:style-name="T2">(39/27) </text:span> ⲣⲟϥ ϫⲉ ⲥ̅ⲁ̅ⲕ̅ⲗ̅ⲁ̅ ⲉⲧⲉ ⲡⲁⲓ̈ ⲡⲉ ⲥⲁ̅ⲙⲁⲏⲗ̅ ⲓⲁ̅ⲗⲧⲁ̅ <text:line-break/><text:span text:style-name="T1"> </text:span><text:span text:style-name="T2">(39/28) </text:span> ⲃ̅ⲁ̅ⲱ̅ⲑ̅ ⲡⲁⲓ̈ ⲛ̅ⲧⲁϥϫⲓ ⲛ̅ⲟⲩϭⲟⲙ̓ ⲛ̅ⲧⲁϥⲧⲱⲣⲡ%6 <text:line-break/><text:span text:style-name="T1"> </text:span><text:span text:style-name="T2">(39/29) </text:span> ⲙ̅ⲙⲟⲥ ⲛ̅ⲧⲟⲟⲧ̅ⲥ̅ ⲛ̅ϯⲁⲧ̓ⲡⲉⲑⲟⲟⲩ ⲛ̅ⲧⲁϥϫⲣⲟ ⲉ <text:line-break/><text:span text:style-name="T1"> </text:span><text:span text:style-name="T2">(39/30) </text:span> ⲣⲟⲥ ⲛ̅ϣⲟⲣⲡ· ⲉⲧⲉ ⲧⲁⲓ̈ ⲧⲉ ⲧⲉⲡⲓⲛⲟⲓⲁ· ⲙ̅ⲡⲟⲩ <text:line-break/><text:span text:style-name="T1"> </text:span><text:span text:style-name="T2">(39/31) </text:span> ⲟⲉⲓⲛⲉ ⲛ̅ⲧⲁⲥⲉⲓ ⲁⲡ̣[ⲓⲧⲛ̅] ⲧ̣ⲁ̣ⲓ̈ ⲛ̅ⲧⲁϥⲉⲓ ⲉⲃⲟⲗ ⲙ̅ <text:line-break/><text:span text:style-name="T1"> </text:span><text:span text:style-name="T2">(39/32) </text:span> ⲙⲟⲥ ϫⲛ̅ ⲛ̅ϣⲟ[ⲣ]ⲡ’ ⲛ̣̅[ⲧⲁⲣⲉⲥ]ⲙ̅ⲙⲉ ϭⲉ ⲛ̅ϭⲓ ⲧⲉ <text:line-break/><text:span text:style-name="T1"> </text:span><text:span text:style-name="T2">(39/33) </text:span> ⲡⲓⲛⲟⲓⲁ ⲙ̅ⲡⲟⲩ̣[ⲟⲉⲓ]ⲛ̣ ϫⲉ ⲁ[ϥ]ⲥ̣ⲟⲡⲥ̅ ⲙ̅ⲙⲟϥ· <text:line-break/><text:span text:style-name="T1"> </text:span><text:span text:style-name="T2">(39/34) </text:span> ⲉⲕⲉⲧⲁ[ⲝⲓⲥ ⲉⲛⲉϥⲑ]ⲃ̣̅ⲃⲓⲁⲉⲓⲧ%6 ⲉⲣⲟⲥ ⲡⲁϫⲉⲥ <text:line-break/><text:span text:style-name="T1"> </text:span><text:span text:style-name="T2">(39/35) </text:span> ϫⲉ ⲙⲁ [ⲛⲁⲓ̈ ⲛ̅ⲕⲉⲧⲁⲝⲓⲥ ϫⲉ ⲉ]ⲕⲉϣⲱⲡⲉ ⲛⲁⲉⲓ <text:line-break/><text:span text:style-name="T1"> </text:span><text:span text:style-name="T2">(39/36) </text:span> ⲙ̣̅[ⲙⲁ] [ⲛ̅][ϣⲱⲡⲉ ⲛ̅ⲧⲁⲧⲙ̅ϣ]ⲱ̣ⲡ̣ⲉ ϩⲛ̅ ⲟⲩⲁⲧⲁⲝⲓⲁ <text:line-break/><text:span text:style-name="T1"> </text:span><text:span text:style-name="T2">(39/37) </text:span> [ⲛ̅ϣⲁ ⲉⲛⲉϩ ⲁⲩⲱ ⲧⲧⲁⲝⲓⲥ ⲙ̅ⲡ]ⲏ̣ⲓ̣̈ ⲧⲏⲣϥ̓ ⲙ̅ <text:line-break/><text:span text:style-name="T1"> </text:span><text:span text:style-name="T2">(40/1) </text:span> ⲡⲉⲟⲟ̣[ⲩ ⲛⲉ]ⲥ̣ⲧ̣ⲏ̣[ⲧ] ⲉ̣ϩⲣⲁⲓ̈ ⲉϫⲛ̅ ⲡⲉⲥ <text:line-break/><text:span text:style-name="T1"> </text:span><text:span text:style-name="T2">(40/2) </text:span> ϣⲁϫⲉ ⲁⲩⲉⲓⲛⲉ ⲛ̅ⲟⲩⲥⲙⲟⲩ ⲉϩⲟⲩⲛ <text:line-break/><text:span text:style-name="T1"> </text:span><text:span text:style-name="T2">(40/3) </text:span> ⲉⲣⲟⲥ ⲁⲩⲱ ⲁⲧ%6ⲧⲁⲝⲓⲥ ⲉⲧϫⲟⲥⲉ ⲕⲱ ⲙ̅ <text:line-break/><text:span text:style-name="T1"> </text:span><text:span text:style-name="T2">(40/4) </text:span> ⲙⲟϥ ⲛⲁⲥ ⲉⲃⲟⲗ ⲁⲩⲱ ⲁϥⲁⲣⲭⲉⲓ ⲛ̅ϭⲓ <text:line-break/><text:span text:style-name="T1"> </text:span><text:span text:style-name="T2">(40/5) </text:span> ⲡⲛⲟϭ ⲛ̅ⲇⲁⲓⲙⲱⲛ ⲁⲧⲥⲉⲛⲟ ⲛ̅ϩⲉⲛ <text:line-break/><text:span text:style-name="T1"> </text:span><text:span text:style-name="T2">(40/6) </text:span> ⲁⲓⲱⲛ ⲙ̅ⲡⲥⲙⲁⲧ ⲛ̅ⲛⲓⲁⲓⲱⲛ ⲉⲧϣⲟⲟⲡ <text:line-break/><text:span text:style-name="T1"> </text:span><text:span text:style-name="T2">(40/7) </text:span> ⲁϥⲧⲥⲉⲛⲟ ⲇⲉ ⲙ̅ⲙⲁⲩ ⲉⲃⲟⲗ ϩⲛ̅ ⲧⲉϥϭⲟⲙ <text:line-break/><text:span text:style-name="T1"> </text:span><text:span text:style-name="T2">(40/8) </text:span> ⲟⲩⲁⲁⲧϥ ⲧⲟⲧⲉ ⲁⲛⲟⲕ̓ ϩⲱⲱⲧ%6 ⲁⲉⲓⲟⲩⲱⲛϩ <text:line-break/><text:soft-page-break/><text:span text:style-name="T1"> </text:span><text:span text:style-name="T2">(40/9) </text:span> ⲉⲃⲟⲗ ⲙ̅ⲡⲁϩⲣⲟⲟⲩ ϩⲛ̅ ⲟⲩⲡⲉⲑⲏⲡ· ⲉⲉⲓ <text:line-break/><text:span text:style-name="T1"> </text:span><text:span text:style-name="T2">(40/10) </text:span> ϫⲱ ⲙ̅ⲙⲟⲥ ϫⲉ ϭⲱ ⲛⲏⲧⲛ̅ ϭⲱ ⲛⲏⲧⲛ̅ <text:line-break/><text:span text:style-name="T1"> </text:span><text:span text:style-name="T2">(40/11) </text:span> ⲛⲁⲉⲓ ⲉⲧⲣ̅ⲡⲁⲧⲓ ⲛ̅ⲧϩⲩⲗⲏ ϫⲉ ⲉⲓⲥ ϩⲏⲏ <text:line-break/><text:span text:style-name="T1"> </text:span><text:span text:style-name="T2">(40/12) </text:span> ⲧⲉ ⲁⲛⲟⲕ̓ ⲁⲉⲓⲛ̅ⲛⲏⲩ ⲉϩⲣⲁⲓ̈ ⲉⲡⲕⲟⲥⲙⲟ[ⲥ] <text:line-break/><text:span text:style-name="T1"> </text:span><text:span text:style-name="T2">(40/13) </text:span> ⲛ̅ⲛ̅ⲣⲉϥⲙⲟⲩ ⲉⲧⲃⲉ ⲡⲁⲙⲉⲣⲟⲥ ⲉⲧⲙ̅ <text:line-break/><text:span text:style-name="T1"> </text:span><text:span text:style-name="T2">(40/14) </text:span> ⲡⲙⲁ ⲉⲧⲙ̅ⲙⲁⲩ ϫⲛ̣̅ ⲙ̅ⲡϩⲟⲟⲩ ⲛ̅ⲧⲁⲩ <text:line-break/><text:span text:style-name="T1"> </text:span><text:span text:style-name="T2">(40/15) </text:span> ϫⲣⲟ ⲁϯⲥⲟⲫⲓⲁ ⲛ̅ⲁⲧⲡⲉⲑⲟⲟⲩ ⲧⲁⲉⲓ ⲛ̅ <text:line-break/><text:span text:style-name="T1"> </text:span><text:span text:style-name="T2">(40/16) </text:span> ⲧ%6ⲁⲥⲉⲓ̓ ⲁⲡⲓⲧⲛ̅ ϫⲉⲕⲁⲁⲥ ⲉⲉⲓⲛⲁϫⲱⲱ <text:line-break/><text:span text:style-name="T1"> </text:span><text:span text:style-name="T2">(40/17) </text:span> ⲣⲉ ⲉⲃⲟⲗ ⲛ̅ⲧⲉⲩϩⲁⲏ ⲧⲁ⟦ⲓ⟧ⲉⲓ ⲉⲧϥⲟⲩⲁϩ· <text:line-break/><text:span text:style-name="T1"> </text:span><text:span text:style-name="T2">(40/18) </text:span> ⲥⲁϩⲛⲉ ⲙ̅ⲙⲟⲥ ⲛ̅ϭⲓ ⲡⲁⲉⲓ ⲉⲧⲟⲩⲱⲛϩ <text:line-break/><text:span text:style-name="T1"> </text:span><text:span text:style-name="T2">(40/19) </text:span> ⲙ̅ⲙⲟϥ̓ ⲉⲃⲟⲗ ϩⲓⲧⲟⲟⲧⲥ ⲁⲩⲱ ⲁⲩ̣ϣⲧⲟⲣ <text:line-break/><text:span text:style-name="T1"> </text:span><text:span text:style-name="T2">(40/20) </text:span> ⲧⲣ̅ ⲧⲏⲣⲟⲩ ⲛ̅ϭⲓ ⲟⲩⲟⲛ ⲛⲓⲙ ⲉⲧϣⲟⲟⲡ <text:line-break/><text:span text:style-name="T1"> </text:span><text:span text:style-name="T2">(40/21) </text:span> ϩⲙ̅ ⲡⲏⲓ̈ ⲙ̅ⲡⲟⲩⲟⲉⲓⲛⲉ ⲛ̅ⲁⲧⲥⲟⲩⲱⲛϥ̓ <text:line-break/><text:span text:style-name="T1"> </text:span><text:span text:style-name="T2">(40/22) </text:span> ⲁⲩⲱ ⲁϥⲛⲟⲉⲓⲛⲉ ⲛ̅ϭⲓ̣ ⲡⲛⲟⲩⲛ ⲁⲩⲱ <text:line-break/><text:span text:style-name="T1"> </text:span><text:span text:style-name="T2">(40/23) </text:span> ⲡⲁⲣⲭⲓⲅⲉⲛⲏⲧⲱⲣ ⲛ̅ⲧⲙⲛ̅ⲧ̅ⲁⲧⲥⲟⲟⲩⲛⲉ <text:line-break/><text:span text:style-name="T1"> </text:span><text:span text:style-name="T2">(40/24) </text:span> ⲁϥⲣ̅ⲣ̅ⲣⲟ ⲁϫⲛ̅ ⲡⲭⲁⲟⲥ ⲙⲛ̅ ⲉⲙⲛ̅ⲧⲉ ⲁϥ <text:line-break/><text:span text:style-name="T1"> </text:span><text:span text:style-name="T2">(40/25) </text:span> ⲧ%6ⲥⲁⲛⲟ ⲛ̅ⲟⲩⲣⲱⲙⲉ ⲙ̅ⲡⲁⲥⲙⲟⲧ· ⲙ̅ⲡϥ̅ <text:line-break/><text:span text:style-name="T1"> </text:span><text:span text:style-name="T2">(40/26) </text:span> ⲙ̅ⲙⲉ ⲇⲉ ϫⲉ ⲡⲉⲧⲙ̅ⲙⲁⲩ ⲛⲁϣⲱⲡⲉ <text:line-break/><text:span text:style-name="T1"> </text:span><text:span text:style-name="T2">(40/27) </text:span> ⲛⲁϥ ⲛ̅ⲟⲩⲕⲣⲓⲙⲁ ⲛ̅ⲃⲱⲗ ⲉⲃⲟⲗ ⲟⲩⲇⲉ <text:line-break/><text:span text:style-name="T1"> </text:span><text:span text:style-name="T2">(40/28) </text:span> ⲛ̅ϥⲥⲟⲟⲩⲛⲉ ⲁⲛ ⲛ̅ⲧϭⲁⲙ ⲉⲧⲛ̅ϩⲣⲁⲓ̈ ⲛ̅ <text:line-break/><text:span text:style-name="T1"> </text:span><text:span text:style-name="T2">(40/29) </text:span> ϩⲏⲧϥ̅ ⲧⲉⲛⲟⲩ ⲇⲉ ⲁⲛⲟⲕ ⲁⲓ̈ⲉⲓ ⲁⲡⲓⲧⲛ̅ <text:line-break/><text:span text:style-name="T1"> </text:span><text:span text:style-name="T2">(40/30) </text:span> ⲁⲩⲱ ⲁⲓ̈ⲡⲱϩ ϣⲁ̣ϩ̣ⲣ̣ⲁ̣ⲓ̣̈ ⲁⲡⲭⲁⲟⲥ ⲁⲩⲱ <text:line-break/><text:span text:style-name="T1"> </text:span><text:span text:style-name="T2">(40/31) </text:span> ⲛⲉⲉⲓϣⲟⲟⲡ [ϩⲁϩⲧ]ⲛ̣̅ ⲛ̣ⲉⲧⲉ ⲛⲱⲉⲓ ⲉ <text:line-break/><text:span text:style-name="T1"> </text:span><text:span text:style-name="T2">(40/32) </text:span> ⲧ%6ⲙ̅ⲡⲙⲁ [ⲉⲧ]ⲙ̣̅ⲙⲁⲩ ⲉ̣ⲉ̣[ⲓϩ]ⲏ̣ⲡ̓ ϩⲣⲁⲓ̈ ⲛ̅ <text:line-break/><text:span text:style-name="T1"> </text:span><text:span text:style-name="T2">(40/33) </text:span> ϩⲏⲧⲟⲩ ⲉⲉⲓϯ̣ ϭⲟⲙ ⲛ̣[ⲁⲩ ⲁⲩⲱ ⲉⲉ]ⲓⲧⲛ̅ <text:line-break/><text:span text:style-name="T1"> </text:span><text:span text:style-name="T2">(40/34) </text:span> ⲛⲁⲩ ϩⲓⲕⲱⲛ ⲁⲩⲱ̣ ϫ̣̅̅[̅ⲛ̅ ⲡ̅ϣⲟⲣⲡ ⲛ̅ⲥⲟ]ⲡ̣· ϣⲁ <text:line-break/><text:span text:style-name="T1"> </text:span><text:span text:style-name="T2">(40/35) </text:span> ϩⲟⲩⲛ ⲁⲡ̣ϩⲟⲟ[ⲩ ⲉϯⲛⲁϯ ϭⲟⲙ ⲉⲥϫⲟ]ⲟ̣ⲣ̣ <text:line-break/><text:span text:style-name="T1"> </text:span><text:span text:style-name="T2">(40/36) </text:span> ⲛ̅ⲛⲉⲧⲉ ⲛⲱ̣ⲓ̣̈ [ⲛⲉ ϯⲛⲁⲟⲩⲟⲛϩⲧ%6 ⲉⲃⲟⲗ ⲉ] <text:line-break/><text:span text:style-name="T1"> </text:span><text:span text:style-name="T2">(40/37) </text:span> ⲛⲁⲉⲓ ⲛ̅ⲧⲁⲩⲥⲱ̣[ⲧⲙ̅ ⲉⲛⲁⲙⲩⲥⲧⲏⲣⲓⲟⲛ] <text:line-break/><text:span text:style-name="T1"> </text:span><text:span text:style-name="T2">(41/1) </text:span> ⲉ̣ⲧⲉ ⲛⲁⲉⲓ ⲛⲉ ⲛ̅ϣ[ⲏⲣ]ⲉ ⲙ̅[ⲡ]ⲟⲩⲟⲉⲓⲛ ⲁⲛⲟⲕ <text:line-break/><text:span text:style-name="T1"> </text:span><text:span text:style-name="T2">(41/2) </text:span> ⲡⲉ ⲡⲟⲩⲉⲓⲱⲧ̓ ⲁⲩⲱ ϯ̣ⲛⲁϫⲱ ⲛⲏⲧⲛ̅ ⲛ̅ⲟⲩ <text:line-break/><text:span text:style-name="T1"> </text:span><text:span text:style-name="T2">(41/3) </text:span> ⲙⲩⲥⲧⲏⲣⲓⲟⲛ ⲛ̅ⲁⲧ%6ϣⲁϫ̣ⲉ ⲙ̅ⲙ̣ⲟϥ ⲁⲩⲱ ⲛ̅ⲁⲧ%6 <text:line-break/><text:span text:style-name="T1"> </text:span><text:span text:style-name="T2">(41/4) </text:span> ⲧⲉⲩⲟϥ ⲉⲃⲟⲗ ϩⲛ̅ ⲧⲁⲡⲣⲟ [ⲛⲓ]ⲙ̣ ⲛ̅ⲥⲛⲁⲩϩ ⲧⲏ <text:line-break/><text:span text:style-name="T1"> </text:span><text:span text:style-name="T2">(41/5) </text:span> ⲣⲟⲩ ⲁⲉⲓⲃⲱⲗ· ⲙ̅ⲙⲟⲟⲩ ⲉⲃⲟⲗ̣ ⲛ̣ⲏⲧⲛ̅ ⲁⲩⲱ ⲙ̅ <text:line-break/><text:span text:style-name="T1"> </text:span><text:span text:style-name="T2">(41/6) </text:span> ⲙⲣ̅ⲣⲉ ⲛ̅ⲛ̅ⲇⲁⲓⲙⲱⲛ ⲛ̅ⲉⲙⲛ̣̅ⲧⲉ ⲁⲉⲓⲥⲟⲗⲡⲟⲩ <text:line-break/><text:span text:style-name="T1"> </text:span><text:span text:style-name="T2">(41/7) </text:span> ⲛⲁⲓ̈ ⲉⲧⲙⲏⲣ ⲛ̅ⲛⲁⲙⲉⲗⲟⲥ ⲉⲩϯ ⲁϩⲏⲧⲟⲩ ⲁⲩ <text:line-break/><text:span text:style-name="T1"> </text:span><text:span text:style-name="T2">(41/8) </text:span> ⲱ ⲛⲓⲥⲁⲃⲧ· ⲉⲧϫⲟⲥⲉ ⲛ̅ⲧⲉ ⲡⲕⲁⲕⲉ ⲁⲉⲓϣⲣ̅ <text:line-break/><text:span text:style-name="T1"> </text:span><text:span text:style-name="T2">(41/9) </text:span> ϣⲱⲣⲟⲩ ⲁⲡⲓⲧⲛ̅ ⲁⲩⲱ ⲙ̅ⲡⲩⲗⲏ ⲉⲧⲟⲣϫ ⲛ̅ⲧⲉ <text:line-break/><text:span text:style-name="T1"> </text:span><text:span text:style-name="T2">(41/10) </text:span> ⲛⲓⲁⲧ%6ⲛⲁⲉ ⲁⲉⲓϩⲁϣϥⲟⲩ ⲁⲩⲱ ⲛⲉⲩⲙⲟⲭⲗⲟⲥ <text:line-break/><text:span text:style-name="T1"> </text:span><text:span text:style-name="T2">(41/11) </text:span> ⲁⲉⲓϩⲟⲣⲃⲟⲩ ⲁⲩⲱ ⲧⲉⲛⲉⲣⲅⲓⲁ ⲉⲧϩⲟⲟⲩ ⲙⲛ̅ <text:line-break/><text:span text:style-name="T1"> </text:span><text:span text:style-name="T2">(41/12) </text:span> ⲡ̣ⲉⲧϩⲓⲟⲩⲉ ⲁⲣⲱⲧⲛ̅ ⲙⲛ̅ ⲡⲉⲧⲥⲱϣⲧ ⲙⲙⲱ <text:line-break/><text:span text:style-name="T1"> </text:span><text:span text:style-name="T2">(41/13) </text:span> ⲧⲛ̅ ⲁⲩⲱ ⲡⲧⲩⲣⲁⲛⲛⲟⲥ ⲙⲛ̅ ⲡⲁⲛⲧⲓⲕⲉⲓⲙⲉ <text:line-break/><text:span text:style-name="T1"> </text:span><text:span text:style-name="T2">(41/14) </text:span> ⲛⲟⲥ ⲙⲛ̅ ⲡⲉⲧⲟ ⲛ̅ⲣ̣̅ⲣⲟ ⲁⲩⲱ ⲡϫⲁϫⲉ ⲉⲧϣⲟ <text:line-break/><text:span text:style-name="T1"> </text:span><text:span text:style-name="T2">(41/15) </text:span> ⲟⲡ· ⲛⲁⲓ̈ ϭⲉ ⲧⲏⲣⲟⲩ ⲁⲉⲓⲧⲥⲉⲃⲟⲟⲩ ⲁⲛⲉⲧⲉ <text:line-break/><text:span text:style-name="T1"> </text:span><text:span text:style-name="T2">(41/16) </text:span> ⲛⲱⲓ̈ ⲛⲉ ⲉⲧⲉ ⲛⲁⲉⲓ ⲛⲉ ⲛ̅ϣⲏⲣⲉ ⲙ̅ⲡⲟⲩⲟⲉⲓⲛ <text:line-break/><text:span text:style-name="T1"> </text:span><text:span text:style-name="T2">(41/17) </text:span> ϫⲉⲕⲁⲁⲥ ⲉⲩⲛⲁⲃⲱⲗ ⲉⲃⲟⲗ ⲛ̅ⲛⲁⲓ̈ ⲧⲏⲣⲟⲩ <text:line-break/><text:span text:style-name="T1"> </text:span><text:span text:style-name="T2">(41/18) </text:span> ⲁⲩⲱ 〈ⲛ̅〉ⲥⲉⲛⲟⲩϩⲙ̅ ⲉⲃⲟⲗ ϩⲛ̅ ⲛⲓⲥⲛⲁⲩϩ ⲧⲏⲣⲟⲩ <text:line-break/><text:soft-page-break/><text:span text:style-name="T1"> </text:span><text:span text:style-name="T2">(41/19) </text:span> ⲛ̅ⲥⲉⲉⲓ ⲉϩⲟⲩⲛ ⲁⲡⲙⲁ ⲉⲧⲉ ⲛⲁⲩⲙ̅ⲙⲁⲩ ⲛ̅ <text:line-break/><text:span text:style-name="T1"> </text:span><text:span text:style-name="T2">(41/20) </text:span> ϣⲟⲣⲡ· ⲁⲛⲟⲕ%6 ⲡⲉ ⲡϣⲟⲣⲡ ⲛ̅ⲧⲁⲓ̈ⲉⲓ ⲁⲡⲓⲧⲛ̅ <text:line-break/><text:span text:style-name="T1"> </text:span><text:span text:style-name="T2">(41/21) </text:span> ⲉⲧⲃⲉ ⲡⲁⲙⲉⲣⲟⲥ ⲉⲧⲥⲟϫⲡ’ ⲉⲧⲉ ⲡⲁⲓ̈ ⲡⲉ <text:line-break/><text:span text:style-name="T1"> </text:span><text:span text:style-name="T2">(41/22) </text:span> ⲡⲡⲛ̅ⲁ̅ ⲉⲧϣⲟⲟⲡ’ ϩⲛ̅ ⲧⲯⲩⲭⲏ ⲛ̅ⲧⲁϥϣⲱ <text:line-break/><text:span text:style-name="T1"> </text:span><text:span text:style-name="T2">(41/23) </text:span> ⲡⲉ ⲉⲃⲟⲗ ϩⲙ̅ ⲡⲙⲟⲟⲩ ⲙ̅ⲡⲱⲛϩ ⲁⲩⲱ ⲉⲃⲟⲗ <text:line-break/><text:span text:style-name="T1"> </text:span><text:span text:style-name="T2">(41/24) </text:span> ϩⲙ̅ ⲡϫⲱⲕⲙ̅ ⲛⲙ̅ⲙⲩⲥⲧⲏⲣⲓⲟⲛ ⲁⲉⲓϣⲁϫⲉ <text:line-break/><text:span text:style-name="T1"> </text:span><text:span text:style-name="T2">(41/25) </text:span> ⲁⲛⲟⲕ ⲙⲛ̅ ⲛ̅ⲁⲣⲭⲱⲛ ⲁⲩⲱ ϩⲉⲛⲉⲝⲟⲩⲥⲓⲁ <text:line-break/><text:span text:style-name="T1"> </text:span><text:span text:style-name="T2">(41/26) </text:span> ⲁⲉⲓⲃⲱⲕ ⲅⲁⲣ ⲉϩⲣⲁⲓ̈ ⲉⲡⲥⲁ ⲙ̅ⲡⲓⲧⲛ̅ ⲙ̅ⲡⲟⲩ <text:line-break/><text:span text:style-name="T1"> </text:span><text:span text:style-name="T2">(41/27) </text:span> ⲗⲁⲥ ⲁⲩⲱ ⲁⲉⲓϫⲱ ⲛ̅ⲛⲁⲙⲩⲥⲧⲏⲣⲓⲟⲛ ⲁⲛⲉ <text:line-break/><text:span text:style-name="T1"> </text:span><text:span text:style-name="T2">(41/28) </text:span> ⲧⲉ ⲛⲱⲓ̈ ⲟⲩⲙⲩⲥⲧⲏⲣⲓⲟⲛ ⲉϥϩⲏⲡ· ⲁⲩⲃⲱⲗ <text:line-break/><text:span text:style-name="T1"> </text:span><text:span text:style-name="T2">(41/29) </text:span> ⲉⲃⲟⲗ ⲛ̅ⲛ̅ⲥⲛⲁⲩϩ ⲙⲛ̅ ⲧⲃ̅ϣⲉ ⲛ̅{ⲁⲛ}ⲁⲛⲉϩ <text:line-break/><text:span text:style-name="T1"> </text:span><text:span text:style-name="T2">(41/30) </text:span> ⲁⲩⲱ ⲁⲉⲓϯ ⲕⲁⲣⲡⲟⲥ ϩⲣⲁⲓ̈ ⲛ̅ϩⲏⲧⲟⲩ ⲉⲧⲉ ⲡⲁⲓ̈ <text:line-break/><text:span text:style-name="T1"> </text:span><text:span text:style-name="T2">(41/31) </text:span> ⲡⲉ ⲡⲙⲉⲉⲩⲉ ⲙ̅ⲡⲁⲓⲱ̣[ⲛ] ⲛ̅ⲁⲧϣⲓⲃⲉ ⲁⲩⲱ <text:line-break/><text:span text:style-name="T1"> </text:span><text:span text:style-name="T2">(41/32) </text:span> ⲡⲁⲏⲓ̈ ⲙⲛ̅ ⲡⲟ̣[ⲩⲉⲓ]ⲱ̣ⲧ ⲁⲩⲱ ⲁⲛⲟⲕ ⲁⲉⲓⲃⲱⲕ <text:line-break/><text:span text:style-name="T1"> </text:span><text:span text:style-name="T2">(41/33) </text:span> ⲉϩⲣⲁⲓ̈ [ⲁⲛⲁⲓ̈ ⲉⲧⲉ ⲛ]ⲱⲓ̈ ϫⲛ̅ ⲛ̅ϣⲟⲣⲡ ⲁⲩⲱ <text:line-break/><text:span text:style-name="T1"> </text:span><text:span text:style-name="T2">(41/34) </text:span> ⲁⲉⲓⲧ%6ⲉ̣[ϩⲟⲟⲩ ⲁⲉⲓⲥⲉⲗⲡ ⲛ̅]ϣⲟⲣⲡ ⲛ̅ϣⲗⲟⲡ <text:line-break/><text:span text:style-name="T1"> </text:span><text:span text:style-name="T2">(41/35) </text:span> ⲛ̣̅ⲧ̣[ⲁ]ⲩ̣ⲁ̣ⲁ̣[ⲩ ⲛ̅ϩⲙ̅ϩⲁⲗ· ⲧⲟⲧ]ⲉ̣ ⲁ̣ⲩ̣ⲣ̅ⲟⲩⲟⲉⲓⲛ <text:line-break/><text:span text:style-name="T1"> </text:span><text:span text:style-name="T2">(41/36) </text:span> ⲛ̅ϭⲓ ⲟⲩⲟⲛ ⲛⲓⲙ̣ ⲛ̣̅[ⲛⲉⲧⲛ̅ϩⲣⲁⲓ̈] ⲛ̣̅ϩⲏⲧ ⲁⲩⲱ <text:line-break/><text:span text:style-name="T1"> </text:span><text:span text:style-name="T2">(42/1) </text:span> ⲁⲉⲓⲥⲟⲃⲧⲉ ⲛ̅ⲟⲩ[ⲥ]ⲙⲟ[ⲧ] ⲛ̣̅ⲛⲓⲟⲩⲟⲉⲓⲛⲉ ⲉⲧⲛ̣̅ <text:line-break/><text:span text:style-name="T1"> </text:span><text:span text:style-name="T2">(42/2) </text:span> ϩⲣⲁⲓ̈ ⲛ̅ϩⲏⲧ· ⲛ̅ⲁⲧⲥⲉϫⲉ̣ ⲙ̅ⲙⲟⲟⲩ ϩⲁⲙⲏⲛ <text:line-break/><text:span text:style-name="T1"> </text:span><text:span text:style-name="T2">(42/3) </text:span> 2ʹ26 2 <text:line-break/><text:span text:style-name="T1"> </text:span><text:span text:style-name="T2">(42/4) </text:span> {2̅ⲡ̅[̅ⲗ̅ⲟ̅ⲅ̅]̅ⲟ̅ⲥ̅ ̅̅̅ⲛ̅ⲧ̅ⲡ̅ⲣ̅ⲱ̅ⲧ̅ⲉ̅ⲛ̅ⲛ̅ⲟ̅ⲓ̅ⲁ̅ ̅[̅̅̅ⲁ̅]}2 <text:line-break/><text:span text:style-name="T1"> </text:span><text:span text:style-name="T2">(42/5) </text:span> ⲁⲛⲟⲕ ⲡⲉ ⲡϩⲣⲟⲟⲩ ⲛ̅ⲧⲁϥⲟⲩⲱⲛϩ ⲉⲃⲟⲗ ϩⲓⲧ̣[ⲟ] <text:line-break/><text:span text:style-name="T1"> </text:span><text:span text:style-name="T2">(42/6) </text:span> ⲟⲧϥ· ⲙ̅ⲡⲁⲙⲉⲉⲩⲉ ⲁⲛⲟⲕ ⲅⲁⲣ ⲡⲉ ⲡⲉⲧϩⲁⲧⲣⲉ̣ <text:line-break/><text:span text:style-name="T1"> </text:span><text:span text:style-name="T2">(42/7) </text:span> ⲉⲩⲙⲟⲩⲧⲉ ⲉⲣⲟⲓ̈ ϫⲉ ⲡⲙⲉⲉⲩⲉ ⲙ̅ⲡⲓⲁⲧⲛⲁⲩ ⲉⲣⲟ[ϥ] <text:line-break/><text:span text:style-name="T1"> </text:span><text:span text:style-name="T2">(42/8) </text:span> ⲉⲩⲙⲟⲩⲧⲉ ⲉⲣⲟⲓ̈ ϫⲉ ⲧⲥⲙⲏ ⲉⲧⲉ ⲙⲁⲥϣⲓⲃⲉ ⲥ[ⲉ] <text:line-break/><text:span text:style-name="T1"> </text:span><text:span text:style-name="T2">(42/9) </text:span> ⲙⲟⲩⲧⲉ ⲉⲣⲟⲓ̈ ϫⲉ ⲧⲉⲧϩⲟⲧⲣⲉ ⲁⲛⲟⲕ ⲟⲩⲓ̈ⲉ ⲛ̅[ⲟⲩ] <text:line-break/><text:span text:style-name="T1"> </text:span><text:span text:style-name="T2">(42/10) </text:span> ⲱⲧ· ⲉⲉⲓⲟ ⲛ̅ⲁⲧϫⲱϩⲙⲉ ⲁⲛⲟⲕ ⲧⲉ ⲧⲙⲁⲁⲩ̣ [ⲙ̅] <text:line-break/><text:span text:style-name="T1"> </text:span><text:span text:style-name="T2">(42/11) </text:span> ⲡϩⲣⲟⲟⲩ ⲉⲉⲓϣⲁϫⲉ ⲛ̅ϩⲁϩ ⲛ̅ⲣⲏⲧⲉ ⲉⲉⲓϫⲱⲕ̓ ⲉ̣ <text:line-break/><text:span text:style-name="T1"> </text:span><text:span text:style-name="T2">(42/12) </text:span> ⲃⲟⲗ̓ ⲙ̅ⲡⲧⲏⲣϥ ⲉⲣⲉⲡⲥ̣ⲟⲟⲩⲛ ϣⲟⲟⲡ̓ ⲛ̅ϩⲣⲁⲓ̈ ⲛ̣̅ <text:line-break/><text:span text:style-name="T1"> </text:span><text:span text:style-name="T2">(42/13) </text:span> ϩⲏⲧ̓ ⲡⲥⲟⲟⲩⲛ ⲛ̅〈ⲛⲉ〉ⲧⲉ ⲙⲛ̅ⲧⲉⲩ ϩⲁⲏ ⲁⲛⲟⲕ ⲡ[ⲉⲧ] <text:line-break/><text:span text:style-name="T1"> </text:span><text:span text:style-name="T2">(42/14) </text:span> ϣⲁϫⲉ ϩⲣⲁⲓ̈ ϩⲛ̅ ⲥⲱⲛⲧ̓ ⲛⲓⲙ· ⲁⲩⲱ ⲁⲩⲥⲟⲩⲱⲛⲧ̓ <text:line-break/><text:span text:style-name="T1"> </text:span><text:span text:style-name="T2">(42/15) </text:span> ⲉⲃⲟⲗ ϩⲓⲧⲟⲟⲧϥ· ⲙ̅ⲡⲧⲏⲣϥ ⲁⲛⲟⲕ ⲡⲉⲧϯ ⲛ̅ <text:line-break/><text:span text:style-name="T1"> </text:span><text:span text:style-name="T2">(42/16) </text:span> ⲧⲥⲙⲏ ⲙ̅ⲡϩⲣⲟⲟⲩ ⲉϩⲣⲁⲓ̈ ⲁⲙⲙⲁⲁϫⲉ ⲛ̅ⲛⲉⲛ <text:line-break/><text:span text:style-name="T1"> </text:span><text:span text:style-name="T2">(42/17) </text:span> ⲧⲁⲩⲥⲟⲩⲱⲛⲧ· ⲉⲧⲉ ⲛⲁⲉⲓ ⲛⲉ ⲛ̅ϣⲏⲣⲉ ⲙ̅ⲡⲟⲩⲟ <text:line-break/><text:span text:style-name="T1"> </text:span><text:span text:style-name="T2">(42/18) </text:span> ⲉⲓⲛⲉ ⲁⲓ̈ⲉⲓ ⲇⲉ ⲙ̅ⲡⲙⲁϩⲥⲉⲡ̓ⲥⲛⲁⲩ ⲙ̅ⲡⲥⲙⲟⲧ̓ <text:line-break/><text:span text:style-name="T1"> </text:span><text:span text:style-name="T2">(42/19) </text:span> ⲛ̅ⲟⲩⲥϩⲓⲙⲉ ⲁⲩⲱ ⲁⲓ̈ϣⲁϫⲉ ⲛⲙ̅ⲙⲁⲩ ⲁⲩⲱ <text:line-break/><text:span text:style-name="T1"> </text:span><text:span text:style-name="T2">(42/20) </text:span> ϯⲛⲁⲧⲁⲙⲟⲟⲩ ⲁⲑⲁ⟦ϩ⟧ⲏ ⲙ̅ⲡⲁⲓⲱⲛ ⲉⲧⲛⲁϣⲱ <text:line-break/><text:span text:style-name="T1"> </text:span><text:span text:style-name="T2">(42/21) </text:span> ⲡⲉ ⲁⲩⲱ ϯⲛⲁⲧⲥⲉⲃⲟⲟⲩ ⲁⲧⲁⲣⲭⲏ ⲙ̅ⲡⲁⲓⲱⲛ <text:line-break/><text:span text:style-name="T1"> </text:span><text:span text:style-name="T2">(42/22) </text:span> ⲉⲧⲛⲏⲩ ⲡⲁⲓ̈ ⲉⲧⲉ ⲙⲛ̅ⲧⲁϥ ⲙ̅ⲙⲁⲩ ⲛ̅ⲟⲩϣⲓⲃⲉ <text:line-break/><text:span text:style-name="T1"> </text:span><text:span text:style-name="T2">(42/23) </text:span> ⲡⲁⲓ̈ ⲉⲧⲟⲩⲛⲁϣⲓⲃⲉ ⲙ̅ⲡⲛ̅ϩⲟ ϩⲣⲁⲓ̈ ⲛ̅ϩⲏⲧϥ’ <text:line-break/><text:span text:style-name="T1"> </text:span><text:span text:style-name="T2">(42/24) </text:span> ⲉⲩⲛⲁⲧⲟⲩⲃⲟⲛ ϩⲣⲁⲓ̈ ϩⲛ̅ ⲛⲓⲁⲓⲱⲛ ⲛⲁⲓ̈ ⲉⲛⲧⲁⲓ̈ <text:line-break/><text:span text:style-name="T1"> </text:span><text:span text:style-name="T2">(42/25) </text:span> ⲟⲩⲟⲛϩⲧ%6 ⲉⲃⲟⲗ ϩⲣⲁⲓ̈ ⲛ̅ϩⲏⲧⲟⲩ ϩⲣⲁⲓ̈ ϩⲙ̅ ⲡⲙⲉ <text:line-break/><text:span text:style-name="T1"> </text:span><text:span text:style-name="T2">(42/26) </text:span> ⲉⲩⲉ ⲙ̅ⲡⲓⲛⲉ ⲛ̅ⲧⲁⲙⲛ̅ⲧϩⲟⲟⲩⲧ· ⲁⲉⲓⲕⲁⲁⲧ%6 ⲉϩ <text:line-break/><text:span text:style-name="T1"> </text:span><text:span text:style-name="T2">(42/27) </text:span> ⲣⲁⲓ̈ ϩⲛ̅ ⲛⲉⲧⲙ̅ⲡϣⲁ ϩⲣⲁⲓ̈ ϩⲙ̅ ⲡⲙⲉⲉⲩⲉ ⲙ̅ⲡⲁ <text:line-break/><text:span text:style-name="T1"> </text:span><text:span text:style-name="T2">(42/28) </text:span> ⲁⲓⲱⲛ ⲛ̅ⲁⲧϣⲓⲃⲉ ϯⲛⲁϫⲱ ⲅⲁⲣ ⲁⲣⲱⲧⲛ̅ ⲛ̅ⲟⲩ <text:line-break/><text:span text:style-name="T1"> </text:span><text:span text:style-name="T2">(42/29) </text:span> ⲙⲩⲥⲧⲏⲣⲓⲟⲛ ⲛ̅[ⲧ]ⲉ̣ ⲡⲓⲁⲓⲱⲛ· ⲉⲧⲉ ⲡⲁⲓ̈ ⲡⲉ ⲁⲩ <text:line-break/><text:soft-page-break/><text:span text:style-name="T1"> </text:span><text:span text:style-name="T2">(42/30) </text:span> ⲱ ϯⲛⲁⲧⲁⲙⲱⲧⲛ̣̅ ⲁⲛⲉ̣[ⲛⲉⲣ]ⲅ̣ⲉⲓⲁ ⲉⲧⲛ̅ϩⲣⲁⲓ̈ ⲛ̅ <text:line-break/><text:span text:style-name="T1"> </text:span><text:span text:style-name="T2">(42/31) </text:span> ϩⲏⲧϥ· ⲡϫⲡⲟ ϥⲙⲟⲩⲧⲉ̣ [ⲉϩⲟⲩⲛ ⲧⲟ]ⲩ̣ⲛⲟⲩ ⲥϫⲡ[ⲟ] <text:line-break/><text:span text:style-name="T1"> </text:span><text:span text:style-name="T2">(42/32) </text:span> ⲛ̅ⲧⲟⲩⲛⲟⲩ ⲫⲟ[ⲟⲩ ϥϫⲡⲟ ⲙ̅ⲡϩⲟ]ⲟ̣ⲩ ⲛ̅ⲉⲃⲁ <text:line-break/><text:span text:style-name="T1"> </text:span><text:span text:style-name="T2">(42/33) </text:span> ⲧⲉ ⲁⲩⲧⲁⲙⲉ ⲡ̣ⲉ̣ⲃ̣[ⲟⲧ ⲡⲟⲩⲟⲉⲓ]ϣ̣ ⲁ̣ϥ̣ⲕ̣[ⲱ]ⲧ̣ⲉ̣⟦ⲃ̣⟧ <text:line-break/><text:span text:style-name="T1"> </text:span><text:span text:style-name="T2">(42/34) </text:span> ⲉϥⲟⲩⲏϩ ⲛ̣̅ⲥ̣[ⲁ ⲡⲟⲩⲟⲉⲓ]ϣ̣ ⲡ̣ⲓⲁⲓⲱⲛ ⲉⲧⲉ ⲡⲁ[ⲓ̈ ⲡⲉ] <text:line-break/><text:span text:style-name="T1"> </text:span><text:span text:style-name="T2">(43/1) </text:span> [ⲛ̅]ⲧ̣ⲁϥϫⲱⲕ ⲉⲃⲟⲗ ⲙ̅ⲡ̣[ⲓ]ⲣ̣ⲏⲧ[ⲉ] ⲁ̣ⲩⲱ ⲁⲩⲟⲡϥ̓ ⲁⲩ <text:line-break/><text:span text:style-name="T1"> </text:span><text:span text:style-name="T2">(43/2) </text:span> ⲱ̣ ϥⲥⲟⲃⲕ· ⲟⲩⲧⲏⲃⲉ ⲅⲁⲣ ⲡ̣ⲉⲧⲁϥⲕⲱ ⲉⲃⲟⲗ ⲛ̅ⲟⲩ <text:line-break/><text:span text:style-name="T1"> </text:span><text:span text:style-name="T2">(43/3) </text:span> ⲧ̣ⲏⲃⲉ ⲁⲩⲱ ⲟⲩⲙⲣ̅ⲣⲉ ⲛ̅ⲧⲁ̣[ⲥ]ⲃ̣ⲱ̣[ⲗ ⲉ]ⲃⲟⲗ ϩⲓⲧⲛ̅ <text:line-break/><text:span text:style-name="T1"> </text:span><text:span text:style-name="T2">(43/4) </text:span> ⲟ̣ⲩ̣ⲙⲣⲣⲉ ⲛ̅ⲧⲁⲣⲟⲩⲙ̅ⲙⲉ ϭⲉ ⲛ̣̅[ϭⲓ ⲛ̅ⲛ]ⲟϭ ⲛ̅ⲉⲝⲟⲩ‐ <text:line-break/><text:span text:style-name="T1"> </text:span><text:span text:style-name="T2">(43/5) </text:span> ⲥ̣ⲓⲁ ϫⲉ ⲁⲡⲟⲩⲟⲉⲓϣ ⲙ̅ⲡϫⲱⲕ̣ [ⲉⲃⲟ]ⲗ̣ ⲟⲩⲱⲛϩ ⲉ <text:line-break/><text:span text:style-name="T1"> </text:span><text:span text:style-name="T2">(43/6) </text:span> ⲃ̣ⲟⲗ ⲙ̅ⲡⲣⲏⲧⲉ ⲛ̅ⲧⲛⲉⲕⲉ ⲛ̅ⲧⲉ[ⲧ]ⲛ̣ⲁⲙⲓⲥⲉ ⲁϥϩⲛⲁ̅ <text:line-break/><text:span text:style-name="T1"> </text:span><text:span text:style-name="T2">(43/7) </text:span> ⲉϩⲟⲩⲛ ⲁϩⲓⲣⲙ̅ ⲡⲣⲟ ⲧⲁⲓ̈ ⲧⲉ ⲑⲉ ⲉⲁϥϩⲛⲁⲛ̓ ⲉϩⲟⲩ̅ <text:line-break/><text:span text:style-name="T1"> </text:span><text:span text:style-name="T2">(43/8) </text:span> ⲛ̅ϭⲓ ⲡⲧⲉⲕⲟ ⲁⲩⲛⲁⲓ̈ⲛ ⲧⲏⲣⲟⲩ ϩⲓ ⲟⲩⲥⲟⲡ̓ ⲛ̅ϭⲓ ⲛ̅ <text:line-break/><text:span text:style-name="T1"> </text:span><text:span text:style-name="T2">(43/9) </text:span> [ⲥ]ⲧⲟⲓⲭⲓⲟⲛ ⲁⲩⲱ ⲛ̅ⲥⲛ̅ⲧⲉ ⲛ̅ⲉⲙⲛⲧⲉ ⲙⲛ̅ ⲙ̅ⲙⲉ <text:line-break/><text:span text:style-name="T1"> </text:span><text:span text:style-name="T2">(43/10) </text:span> ⲗ̣ⲱⲧ ⲙ̅ⲡⲭⲁⲟⲥ ⲁⲩⲕⲓⲙ̓ ⲁⲩⲛⲟϭ ⲛ̅ⲥⲁⲧⲉ ⲡⲣ̅ⲣⲓⲉ <text:line-break/><text:span text:style-name="T1"> </text:span><text:span text:style-name="T2">(43/11) </text:span> [ϩⲣ]ⲁ̣ⲓ̈ ϩⲛ̅ ⲧⲟⲩⲙⲏⲧⲉ ⲁⲩⲱ ⲙ̅ⲡⲉⲧⲣⲁ ⲙⲛ̅ ⲡⲕⲁϩ ⲁⲩ <text:line-break/><text:span text:style-name="T1"> </text:span><text:span text:style-name="T2">(43/12) </text:span> ⲕⲓⲙ’ ⲙ̅ⲡⲣⲏⲧⲉ ⲛ̅ⲟⲩⲕⲁϣ ⲉϥⲕⲓⲙ ϩⲓⲧⲛ̅ ⲡⲧⲏⲩ <text:line-break/><text:span text:style-name="T1"> </text:span><text:span text:style-name="T2">(43/13) </text:span> ⲁⲩⲱ ⲛ̅ⲕⲗⲏⲣⲟⲥ ⲛ̅ⲧϩⲓⲙⲁⲣⲙⲉⲛⲏ ⲙⲛ̅ ⲛⲉⲧϣⲓ <text:line-break/><text:span text:style-name="T1"> </text:span><text:span text:style-name="T2">(43/14) </text:span> ⲛ̅ⲛ̅ⲟⲓⲕⲟⲥ ⲁⲩϣⲧⲟⲣⲧⲣ̅ ⲙ̅ⲡϣⲁ ⲉϩⲣⲁⲓ̈ ⲁϫⲛ̅ <text:line-break/><text:span text:style-name="T1"> </text:span><text:span text:style-name="T2">(43/15) </text:span> ⲟⲩϩⲣⲟⲩⲙⲡⲉ ⲉⲛⲁϣⲱϥ ⲁⲩⲱ ⲛ̅ⲑⲣⲟⲛⲟⲥ ⲛ̅ <text:line-break/><text:span text:style-name="T1"> </text:span><text:span text:style-name="T2">(43/16) </text:span> ⲛ̅ⲇⲩⲛⲁⲙⲓⲥ ⲁⲩϣⲧⲟⲣⲧⲣ ⲉⲁⲩⲡⲱⲛⲉ ⲁⲩⲱ ⲡⲟⲩ <text:line-break/><text:span text:style-name="T1"> </text:span><text:span text:style-name="T2">(43/17) </text:span> ⲣ̅ⲣⲟ ⲁϥⲣ̅ ϩⲟⲧⲉ ⲁⲩⲱ ⲛⲉⲧⲡⲱⲧ̓ ⲛ̅ⲥⲁ ⲧϩⲓⲙⲁⲣ’ <text:line-break/><text:span text:style-name="T1"> </text:span><text:span text:style-name="T2">(43/18) </text:span> ⲙⲉⲛⲏ ⲁⲩϯ ⲛ̅ⲧⲟⲩⲏⲡⲥ̅ ⲛ̅ⲕⲟⲧ ⲁⲡⲙⲟⲓ̈ⲧ ⲁⲩ <text:line-break/><text:span text:style-name="T1"> </text:span><text:span text:style-name="T2">(43/19) </text:span> ⲱ ⲡⲁϫⲉⲩ ⲛ̅ⲛ̅ⲇⲩⲛⲁⲙⲓⲥ ϫⲉ ⲟⲩ ⲡⲉ ⲡⲓϣⲧⲟⲣ <text:line-break/><text:span text:style-name="T1"> </text:span><text:span text:style-name="T2">(43/20) </text:span> ⲧⲣ̅ ⲙⲛ̅ ⲡⲓⲕⲓⲙ ⲛ̅ⲧⲁϥⲉⲓ ⲉϩⲣⲁⲓ̈ ⲉϫⲱⲛ ⲉⲃⲟⲗ ϩⲓ <text:line-break/><text:span text:style-name="T1"> </text:span><text:span text:style-name="T2">(43/21) </text:span> ⲧⲟⲟⲧϥ̅ ⲛ̅ⲟⲩϩⲣⲟⲟⲩ ⲉϥ{ϩ}ⲏⲡ ⲁⲧⲥⲙⲏ ⲉⲧϫⲟⲥⲉ <text:line-break/><text:span text:style-name="T1"> </text:span><text:span text:style-name="T2">(43/22) </text:span> ⲁⲩⲱ ⲁϥⲕⲓⲙ· ⲛ̅ϭⲓ ⲡⲛ̅ⲏⲉⲓ ⲧⲏⲣϥ· ⲁⲩⲱ ⲡⲕⲱⲧⲉ <text:line-break/><text:span text:style-name="T1"> </text:span><text:span text:style-name="T2">(43/23) </text:span> ⲧⲏⲣϥ̓ ⲛ̅ⲧⲛ̅ϩⲓⲏ ⲙ̅ⲙⲟⲟϣⲉ ⲉϩⲣⲁⲓ̈ ⲁϥⲙⲉⲧⲉ ⲁⲩ <text:line-break/><text:span text:style-name="T1"> </text:span><text:span text:style-name="T2">(43/24) </text:span> ⲧⲉⲕⲟ ⲁⲩⲱ ⲡⲙⲁⲉⲓⲧ· ⲉⲧⲛ̅ⲙⲟⲟϣⲉ ϩⲓⲱⲱϥ’ <text:line-break/><text:span text:style-name="T1"> </text:span><text:span text:style-name="T2">(43/25) </text:span> ⲡⲁⲓ̈ ⲉⲧϫⲓ ⲙ̅ⲙⲟⲛ ⲉϩⲣⲁⲓ̈ ϣⲁ ⲡⲁⲣⲭⲓⲅⲉⲛⲉ <text:line-break/><text:span text:style-name="T1"> </text:span><text:span text:style-name="T2">(43/26) </text:span> ⲧⲱⲣ ⲙ̅ⲡⲛ̅ϫⲡⲟ ⲁϥⲗⲟ ⲉϥⲥⲙⲟⲛⲧ̓ ⲛⲁⲛ· <text:line-break/><text:span text:style-name="T1"> </text:span><text:span text:style-name="T2">(43/27) </text:span> ⲧⲟⲧⲉ ⲁⲩⲟⲩⲱϣⲃ̅ ⲛ̅ϭⲓ ⲛ̅ⲇ̣ⲩⲛⲁⲙⲓⲥ ⲉⲩϫⲱ <text:line-break/><text:span text:style-name="T1"> </text:span><text:span text:style-name="T2">(43/28) </text:span> ⲙ̅ⲙⲟⲥ ϫⲉ ⲁⲛⲟⲛ ϩⲱⲱⲛ ⲧⲛ̅ⲣ̅ⲁⲡⲟⲣⲓ ⲉ <text:line-break/><text:span text:style-name="T1"> </text:span><text:span text:style-name="T2">(43/29) </text:span> ⲧⲃⲏⲧϥ’ ϫⲉ ⲙ̅ⲡⲛ̅ⲙ̅ⲙⲉ ϫⲉ ⲡⲁ ⲛⲓⲙ ⲡⲉ ⲁⲗ <text:line-break/><text:span text:style-name="T1"> </text:span><text:span text:style-name="T2">(43/30) </text:span> ⲗⲁ ⲧⲱⲱⲛ ⲙⲁⲣⲟⲛ ⲉϩⲣⲁⲓ̈ ϣⲁ ⲡⲁⲣⲭⲓⲅⲉ <text:line-break/><text:span text:style-name="T1"> </text:span><text:span text:style-name="T2">(43/31) </text:span> ⲛⲉⲧⲱⲣ ⲛ̅ⲧⲛ̅ϫⲛⲟⲩϥ ⲁⲩⲥⲱⲟⲩϩ ⲧⲏⲣⲟⲩ ⲛ̅ <text:line-break/><text:span text:style-name="T1"> </text:span><text:span text:style-name="T2">(43/32) </text:span> ϭⲓ ⲛ̅ⲇⲩⲛⲁⲙⲓⲥ ⲁ̣ⲩ̣ⲃⲱⲕ̣ ⲉ̣ϩⲣⲁⲓ̈ ⲙ̅ⲡⲁⲣⲭⲓⲅⲉ <text:line-break/><text:span text:style-name="T1"> </text:span><text:span text:style-name="T2">(43/33) </text:span> ⲛⲉⲧⲱ̣ⲣ̣ [ⲡ]ⲉ̣[ϫⲁ]ⲩ̣ [ⲛⲁ]ϥ ϫⲉ ⲁϥⲧⲟ ⲡⲉⲕϣⲟⲩ <text:line-break/><text:span text:style-name="T1"> </text:span><text:span text:style-name="T2">(43/34) </text:span> ϣⲟⲩ ⲡ̣[ⲁⲓ̈ ⲉⲧⲕ̅ϣⲟⲩ]ϣ̣ⲟ̣ⲩ̣ ⲙ̅ⲙⲟⲕ ϩⲣⲁⲓ̈ ⲛ̅ϩⲏⲧϥ̣̅ <text:line-break/><text:span text:style-name="T1"> </text:span><text:span text:style-name="T2">(43/35) </text:span> ⲙ̅ⲡ̣ⲛ̣̅[ⲥⲱⲧⲙ̅ ⲉⲣⲟⲕ ⲉⲕϫⲱ] ⲙ̣̅ⲙⲟⲥ ϫⲉ ⲁⲛⲟⲕ <text:line-break/><text:span text:style-name="T1"> </text:span><text:span text:style-name="T2">(43/36) </text:span> ⲡ̣ⲉ̣ ⲡ̣ⲛⲟⲩ[ⲧ]ⲉ̣ [ⲁⲩⲱ ⲁⲛⲟⲕ ⲡⲉ ⲡ]ⲉⲧⲛ̅ⲉⲓⲱⲧ’ <text:line-break/><text:span text:style-name="T1"> </text:span><text:span text:style-name="T2">(44/1) </text:span> ⲁⲩⲱ ⲁⲛⲟⲕ̓ ⲡⲉⲛ̣[ⲧ]ⲁⲉⲓϫ̣ⲡ̣ⲉ ⲧⲏⲛⲉ ⲁⲩⲱ ⲙⲛ̣̅ⲕ̣[ⲉ] <text:line-break/><text:span text:style-name="T1"> </text:span><text:span text:style-name="T2">(44/2) </text:span> ⲟⲩⲁ ⲛ̅ⲥⲁⲃⲗⲗⲁⲓ̈ ⲉⲓⲥ ϩ̣ⲏ̣ⲏⲧⲉ ϭⲉ ⲧⲉⲛⲟⲩ ⲁϥⲟⲩⲱⲛ̣[ϩ] <text:line-break/><text:span text:style-name="T1"> </text:span><text:span text:style-name="T2">(44/3) </text:span> ⲉⲃⲟⲗ ⲛ̅ϭⲓ̣ [ⲟⲩ]ϩ̣ⲣ̣ⲟ̣ⲟ̣ⲩ ⲉϥ⟦ϩ⟧ⲏⲡ· ⲁϯⲥⲙⲏ ⲛ̅ⲁⲧ̓ ⲛⲁ[ⲩ] <text:line-break/><text:span text:style-name="T1"> </text:span><text:span text:style-name="T2">(44/4) </text:span> ⲉⲣⲟⲥ ⲧⲁ[ⲡⲁⲓⲱ]ⲛ̣ ⲉⲧⲛ̅ⲥⲟⲟⲩⲛⲉ ⲙ̅ⲙⲟ⟦ϥ⟧ⲥ’ ⲁ̣ⲛ̣ ⲁ̣ⲩ̣ <text:line-break/><text:span text:style-name="T1"> </text:span><text:span text:style-name="T2">(44/5) </text:span> ⲱ ⲁⲛⲟⲛ [ⲙ̅ⲡⲛ̅]ⲥ̣ⲟⲩⲱⲛⲛ̅ ⲟⲩⲁⲁⲧⲛ̅ ϫⲉ ⲁⲛⲏⲡ̣ <text:line-break/><text:span text:style-name="T1"> </text:span><text:span text:style-name="T2">(44/6) </text:span> ⲁⲛⲓⲙ ϫⲉ ⲡϩⲣ̣[ⲟ]ⲟⲩ ⲅⲁⲣ ⲉⲧⲙ̅ⲙⲁⲩ ⲛ̅ⲧⲁⲛⲥⲱⲧ[ⲙ̅] <text:line-break/><text:soft-page-break/><text:span text:style-name="T1"> </text:span><text:span text:style-name="T2">(44/7) </text:span> ⲉⲣⲟϥ ⲟⲩϣⲙ̅ⲙⲟ ⲉⲣⲟⲛ ⲡⲉ ⲁⲩⲱ ⲧⲛ̅ⲥⲟⲟⲩⲛ̣ⲉ <text:line-break/><text:span text:style-name="T1"> </text:span><text:span text:style-name="T2">(44/8) </text:span> ⲙ̅ⲙⲟϥ ⲁⲛ ⲙ̅ⲡⲛ̅ⲙ̅ⲙⲉ ϫⲉ ⲟⲩⲉⲃⲟⲗ ⲧⲟ ⲡⲉ ⲁϥⲓ̣ <text:line-break/><text:span text:style-name="T1"> </text:span><text:span text:style-name="T2">(44/9) </text:span> ⲁϥⲕⲱ ⲛ̅ⲟⲩϩⲣ̅ⲧⲉ ϩⲛ̅ ⲧⲉⲛⲙⲏⲧⲉ ⲁⲩⲱ ⲟⲩⲃⲱⲗ̣ [ⲉ] <text:line-break/><text:span text:style-name="T1"> </text:span><text:span text:style-name="T2">(44/10) </text:span> ⲃⲟⲗ ⲛⲙ̅ⲙⲉⲗⲟⲥ ⲛ̅ⲧⲉ ⲛ̅ⲛ̅ϭⲃⲟⲉⲓ ⲧⲉⲛⲟⲩ ϭⲉ ⲙ̣[ⲁ] <text:line-break/><text:span text:style-name="T1"> </text:span><text:span text:style-name="T2">(44/11) </text:span> ⲣⲛ̅ⲣⲓⲙⲉ ⲁⲩⲱ ⲛ̅ⲧⲛ̅ⲛⲉϩⲡⲉ ϩⲛ̅ ⲟⲩⲛⲉϩⲡ[ⲉ ⲉⲛⲁ] <text:line-break/><text:span text:style-name="T1"> </text:span><text:span text:style-name="T2">(44/12) </text:span> ϣⲱϥ· ⲧⲟⲗⲟⲓⲡⲟⲛ ⲡⲛ̅ⲡⲱⲱⲧ̓ ⲧⲏⲣϥ· ⲙⲁⲣⲛ̅ⲁ̣ <text:line-break/><text:span text:style-name="T1"> </text:span><text:span text:style-name="T2">(44/13) </text:span> ⲁϥ· ⲉⲙⲡⲁⲧⲟⲩⲟⲧⲡⲛ̅ ⲉϩⲟⲩⲛ ⲛ̅ⲃⲓⲁ ⲁⲩⲱ ⲛ̅ⲥⲉ <text:line-break/><text:span text:style-name="T1"> </text:span><text:span text:style-name="T2">(44/14) </text:span> ϫⲓⲧⲛ̅ ⲁⲡⲓⲧⲛ̅ ⲁⲕⲟⲩⲛϥ̓ ⲛ̅ⲉⲙⲛ̅ⲧ̅ⲉ ⲏⲇⲏ ⲅⲁⲣ ⲁϥ̣ <text:line-break/><text:span text:style-name="T1"> </text:span><text:span text:style-name="T2">(44/15) </text:span> ϩⲛⲁⲛ ⲉϩⲟⲩⲛ ⲛ̅ϭⲓ ⲡⲃⲱⲗ ⲉⲃⲟⲗ ⲛ̅ⲧⲛ̅ⲙⲣ̅ⲣⲉ <text:line-break/><text:span text:style-name="T1"> </text:span><text:span text:style-name="T2">(44/16) </text:span> ⲁⲩⲱ ⲛ̅ⲭⲣⲟⲛⲟⲥ ⲥⲉϣⲱⲧ̓ ⲁⲩⲱ ⲛ̅ϩⲟⲟⲩ ⲁⲩⲥⲃⲟⲕ <text:line-break/><text:span text:style-name="T1"> </text:span><text:span text:style-name="T2">(44/17) </text:span> ⲁⲩⲱ ⲡⲛ̅ⲟⲩⲟⲉⲓϣ ⲁϥϫⲱⲕ̓ ⲉⲃⲟⲗ ⲁⲩⲱ ⲡⲣⲓⲙⲉ <text:line-break/><text:span text:style-name="T1"> </text:span><text:span text:style-name="T2">(44/18) </text:span> ⲛ̅ⲧⲉ ⲡⲛ̅ⲧⲉⲕⲟ ⲁϥϩⲛⲁⲛ ⲉϩⲟⲩⲛ ⲉⲣⲟⲛ ϫⲉⲕⲁⲁⲥ <text:line-break/><text:span text:style-name="T1"> </text:span><text:span text:style-name="T2">(44/19) </text:span> ⲉⲩⲛⲁϫⲓⲧⲛ̅ ⲁⲡⲙⲁ ⲉⲛⲧⲛ̅ⲥⲟⲟⲩⲛⲉ ⲙ̅ⲙⲟϥ〈ⲁⲛ〉· ϫⲉ <text:line-break/><text:span text:style-name="T1"> </text:span><text:span text:style-name="T2">(44/20) </text:span> ⲡⲛ̅ϣⲏⲛ ⲛ̅ⲅⲁⲣ ⲛ̅ⲧⲁⲛⲣⲱⲧ ⲉⲃⲟⲗ ⲛ̅ϩⲏⲧϥ̓ ⲟⲩⲕⲁⲣ <text:line-break/><text:span text:style-name="T1"> </text:span><text:span text:style-name="T2">(44/21) </text:span> ⲡⲟⲥ ⲙ̅ⲙⲛ̅ⲧ̅ⲁⲧⲥⲟⲟⲩⲛⲉ ⲡⲉⲧⲉⲩⲛ̅ⲧⲁⲁϥ ⲁⲩⲱ <text:line-break/><text:span text:style-name="T1"> </text:span><text:span text:style-name="T2">(44/22) </text:span> ⲛⲉϥⲕⲉϭⲱⲱⲃⲉ ⲟⲩⲙⲟⲩ ⲡⲉⲧ̓ϣⲟⲟⲡ ⲛ̅ϩⲏⲧⲟⲩ <text:line-break/><text:span text:style-name="T1"> </text:span><text:span text:style-name="T2">(44/23) </text:span> ⲁⲩⲱ ⲟⲩⲕⲁⲕⲉ ⲡⲉⲧϣⲟⲟⲡ ϩⲁ ⲧϩⲁⲓ̈ⲃⲉⲥ ⲛ̅ⲛⲉϥ <text:line-break/><text:span text:style-name="T1"> </text:span><text:span text:style-name="T2">(44/24) </text:span> ϣⲗⲟⲡ ⲁⲩⲱ ⲛ̅ⲧⲁⲛϫⲱⲗⲉ ⲙ̅ⲙⲟϥ ϩⲛ̅ ⲟⲩⲁⲡⲁ <text:line-break/><text:span text:style-name="T1"> </text:span><text:span text:style-name="T2">(44/25) </text:span> ⲧⲏ ⲙⲛ̅ ⲟⲩⲉⲡⲓⲑⲩⲙⲓⲁ ⲡⲁⲓ̈ ⲛ̅ⲧⲁⲡⲭⲁⲟⲥ ⲛ̅ⲁⲧ <text:line-break/><text:span text:style-name="T1"> </text:span><text:span text:style-name="T2">(44/26) </text:span> ⲥⲟⲟⲩⲛⲉ ϣⲱⲡⲉ ⲛⲁⲛ ⲙ̅ⲙⲁ ⲛ̅ϭⲟⲉⲓⲗⲉ ϩⲣⲁⲓ̈ <text:line-break/><text:span text:style-name="T1"> </text:span><text:span text:style-name="T2">(44/27) </text:span> ⲛ̅ϩⲏⲧϥ· ⲉⲓⲥ ϩⲏⲏⲧⲉ ⲅⲁⲣ ⲛ̅ⲧⲟϥ ϩⲱⲱϥ· ⲡⲁⲣⲭⲓ <text:line-break/><text:span text:style-name="T1"> </text:span><text:span text:style-name="T2">(44/28) </text:span> ⲅⲉⲛⲉⲧⲱⲣ̓ ⲙ̅ⲡⲛ̅ϫⲡⲟ ⲉⲧⲛ̅ϣⲟⲩϣⲟⲩ ⲙ̅ⲙⲟⲛ <text:line-break/><text:span text:style-name="T1"> </text:span><text:span text:style-name="T2">(44/29) </text:span> ⲉⲧⲃⲏⲧϥ ⲙ̅ⲡϥⲙ̅ⲙⲉ ϩⲱⲱϥ ⲁϯⲥⲙⲏ ⲧⲉⲛⲟⲩ <text:line-break/><text:span text:style-name="T1"> </text:span><text:span text:style-name="T2">(44/30) </text:span> ϭⲉ ⲥⲱⲧ̅ⲙ̅ ⲉⲣⲟⲉⲓ ⲛ̅ϣⲏⲣⲉ ⲙ̅ⲡⲙⲉⲉⲩⲉ ⲁⲧⲥⲙⲏ <text:line-break/><text:span text:style-name="T1"> </text:span><text:span text:style-name="T2">(44/31) </text:span> ⲛ̅ⲧⲙⲁⲁⲩ ⲙ̅ⲡⲉⲧ̣[ⲛ̅]ⲛⲁⲉ ϫⲉ ⲛ̅ⲧⲱⲧⲛⲉ ⲅⲁⲣ ⲁⲧⲉ <text:line-break/><text:span text:style-name="T1"> </text:span><text:span text:style-name="T2">(44/32) </text:span> ⲧⲛ̅ⲣ̅ⲙ̅ⲡϣⲁ ⲙ̅ⲡⲙⲩⲥⲧ̣[ⲏ]ⲣⲓⲟⲛ ⲡⲁⲓ̈ ⲉⲧϩⲏⲡ ϫⲛ̅ <text:line-break/><text:span text:style-name="T1"> </text:span><text:span text:style-name="T2">(44/33) </text:span> ⲛ̅ⲁⲓⲱⲛ ϫⲉⲕⲁⲁⲥ ⲉⲧⲉ[ⲧⲛ̅ⲛⲁϫⲓⲧ]ϥ̣ ⲁⲩⲱ ⲧ̅ⲥ̅ⲩ̣̅̅ <text:line-break/><text:span text:style-name="T1"> </text:span><text:span text:style-name="T2">(44/34) </text:span> ⲧⲉⲗⲓⲁ ⲙ̅ⲡⲓⲁⲓⲱ̣[ⲛ ⲉⲧⲉ ⲡⲁⲓ̈ ⲡⲉ ⲙⲛ̅] ⲡⲓⲱⲛϩ̣ <text:line-break/><text:span text:style-name="T1"> </text:span><text:span text:style-name="T2">(44/35) </text:span> ⲛ̅ϫⲓ ⲛϭⲟⲛⲥ̣ ⲁ̣[ⲥϩⲛⲁⲛ ⲉϩⲟⲩⲛ ⲁⲩⲱ ϥⲛⲏⲩ ⲛ̅] <text:line-break/><text:span text:style-name="T1"> </text:span><text:span text:style-name="T2">(45/1) </text:span> [ϭⲓ ⲧⲁ]ⲣⲭⲏ ⲙ̣̅ⲡ̣[ⲁⲓⲱⲛ ⲉⲧⲛⲁϣⲱⲡ]ⲉ ⲡⲁⲓ̈ ⲉⲧⲉ ⲙ[ⲛ̅] <text:line-break/><text:span text:style-name="T1"> </text:span><text:span text:style-name="T2">(45/2) </text:span> [ⲧ]ⲉ̣[ϥ] ⲙ̅ⲙⲁⲩ ⲛ̣̅[ⲟⲩϣⲓⲃⲉ ϣⲁ ⲉⲛⲉ]ϩ̣ ⲁⲛⲟⲕ̓ ⲟⲩϩ̣[ⲟ] <text:line-break/><text:span text:style-name="T1"> </text:span><text:span text:style-name="T2">(45/3) </text:span> [ⲟ]ⲩⲧ̣ⲥϩⲓⲙⲉ ⲁ[ⲛⲟⲕ ⲟⲩⲙⲁⲁⲩ ⲁⲛⲟ]ⲕ̓ ⲟⲩⲉⲓⲱⲧ· ⲉⲉ̣[ⲓ] <text:line-break/><text:span text:style-name="T1"> </text:span><text:span text:style-name="T2">(45/4) </text:span> [ϣⲱⲡⲉ] ⲛⲙ̅ⲙⲁⲓ̈ ⲟⲩⲁⲁⲧ%6 ⲉⲉⲓ[ϣⲱⲡⲉ] ⲛⲙ̅ⲙⲁⲓ̈ ⲟⲩ̣[ⲁ] <text:line-break/><text:span text:style-name="T1"> </text:span><text:span text:style-name="T2">(45/5) </text:span> [ⲁⲧ· ⲙⲛ̅ ⲛⲉⲧⲙⲁ]ⲉⲓⲉ ⲙ̅ⲙⲟⲉⲓ [ⲁⲩⲱ] ⲉⲣⲉⲡⲧⲏⲣϥ ⲱ̣ <text:line-break/><text:span text:style-name="T1"> </text:span><text:span text:style-name="T2">(45/6) </text:span> [ϩⲉ ⲉⲣⲁⲧϥ̅] ⲉⲃ̣ⲟ̣ⲗ̣ ϩⲓⲧⲟⲟⲧ%6 ⲟ[ⲩⲁ]ⲁⲧ ⲁⲛⲟⲕ ⲡⲉ ⲧⲁⲧⲉ <text:line-break/><text:span text:style-name="T1"> </text:span><text:span text:style-name="T2">(45/7) </text:span> [ⲉϯ ϩⲓⲕⲱ]ⲛ ⲙ̅ⲡⲧⲏⲣϥ ⲉⲉⲓⲙⲓⲥⲉ ⲙ̅ⲡⲟⲩⲟⲉⲓⲛ ⲉ[ⲧ] <text:line-break/><text:span text:style-name="T1"> </text:span><text:span text:style-name="T2">(45/8) </text:span> [ⲡⲣ̅ⲣⲓⲉ ϩ]ⲛ̣̅ [ⲟⲩ]ⲉ̣ⲟⲟⲩ ⲁⲛⲟⲕ ⲡⲉ ⲡⲁⲉⲓⲱⲛ ⲉⲧⲛ̣[ⲏⲩ] <text:line-break/><text:span text:style-name="T1"> </text:span><text:span text:style-name="T2">(45/9) </text:span> [ⲁⲛⲟⲕ ⲡ]ⲉ ⲡϫⲱⲕ ⲉⲃⲟⲗ ⲙ̅ⲡⲧⲏⲣϥ· ⲉⲧⲉ ⲧⲁⲓ̈ ⲧⲉ ⲙ̅ⲉ̅[̅ⲓ̅]̅ <text:line-break/><text:span text:style-name="T1"> </text:span><text:span text:style-name="T2">(45/10) </text:span> [ⲣ̅ⲟ̅ⲑ̅]̅ⲉ̅ⲁ̅ ⲡⲉⲟⲟⲩ ⲛ̅ⲧⲙⲁⲁⲩ ⲉⲉⲓⲛⲟⲩϫⲉ ⲛ̅ⲟⲩⲥⲙⲏ̣ <text:line-break/><text:span text:style-name="T1"> </text:span><text:span text:style-name="T2">(45/11) </text:span> [ⲛ̅ϩⲣ]ⲟⲟⲩ ⲉϩⲣⲁⲓ̈ ⲁⲙⲙⲁⲁϫⲉ ⲛ̅ⲛⲉⲧⲥⲟⲟⲩⲛⲉ ⲙ̅ⲙⲟ̣ <text:line-break/><text:span text:style-name="T1"> </text:span><text:span text:style-name="T2">(45/12) </text:span> ⲉⲓ ⲁⲩⲱ ϯⲧⲱϩⲙⲉ ⲙ̅ⲙⲱⲧⲛ̅ ⲁϩⲟⲩⲛ ⲁⲡⲟⲩⲟⲉⲓ[ⲛ] <text:line-break/><text:span text:style-name="T1"> </text:span><text:span text:style-name="T2">(45/13) </text:span> ⲉⲧϫⲟⲥⲉ ⲉⲧϫⲏⲕ· ⲉⲃⲟⲗ ⲡⲁⲉⲓ ϭⲉ ⲉⲧⲉⲧⲛ̅ϣⲁⲛⲉⲓ̣ <text:line-break/><text:span text:style-name="T1"> </text:span><text:span text:style-name="T2">(45/14) </text:span> ⲉϩⲟⲩⲛ ⲉⲣⲟϥ ⲧⲉⲧⲛⲁϫⲓ ⲉⲟⲟⲩ ⲛ̅ⲧⲟⲟⲧⲟⲩ ⲛ̅ⲛⲉ[ⲧ] <text:line-break/><text:span text:style-name="T1"> </text:span><text:span text:style-name="T2">(45/15) </text:span> ϯ ⲉⲟⲟⲩ ⲁⲩⲱ ⲥⲉⲛⲁϯ ⲛⲏⲧⲛ̅ ⲑⲣⲟⲛⲟⲥ ⲛ̅ϭⲓ ⲛⲉⲧ̣ <text:line-break/><text:span text:style-name="T1"> </text:span><text:span text:style-name="T2">(45/16) </text:span> ϯ ⲑⲣⲟⲛⲟⲥ ⲧⲉⲧⲛⲛⲁϫⲓ ⲥⲧⲟⲗⲏ ⲛⲏⲧⲛ̅ ⲛ̅ⲧⲟⲟ <text:line-break/><text:span text:style-name="T1"> </text:span><text:span text:style-name="T2">(45/17) </text:span> ⲧⲟⲩ ⲛ̅ⲛⲉⲧϯ ⲥⲧⲟⲗⲏ ⲁⲩⲱ ⲥⲉⲛⲁⲣ̅ⲃⲁⲡⲧⲓⲍⲉ [ⲙ̅] <text:line-break/><text:span text:style-name="T1"> </text:span><text:span text:style-name="T2">(45/18) </text:span> ⲙⲱⲧⲛ̅ ⲛ̅ϭⲓ ⲛ̅ⲃⲁⲡⲧⲓⲥ̣ⲧⲏⲥ ⲛ̅ⲧⲉⲧⲛ̅ϣⲱⲡⲉ ⲛ̣̅ <text:line-break/><text:soft-page-break/><text:span text:style-name="T1"> </text:span><text:span text:style-name="T2">(45/19) </text:span> ⲉⲟⲟⲩ ⲙⲛ̅ ϩⲉⲛⲉⲟⲟⲩ ⲡⲁⲓ̈ ⲉⲛⲉⲧⲉⲧⲛ̅ϣⲟⲟⲡ̣ <text:line-break/><text:span text:style-name="T1"> </text:span><text:span text:style-name="T2">(45/20) </text:span> ϩⲣⲁⲓ̈ ⲛ̅ϩⲏⲧϥ· ⲛ̅ϣⲟⲣⲡ· ⲉⲧⲉⲧⲛ̅ⲟⲉⲓ ⲛ̅ⲟⲩ〈ⲟ〉ⲉⲓⲛ[ⲉ] <text:line-break/><text:span text:style-name="T1"> </text:span><text:span text:style-name="T2">(45/21) </text:span> ⲁⲩⲱ ⲁⲉⲓϩⲟⲡⲧ· ϩⲣⲁⲓ̈ ϩⲛ̅ ⲟⲩⲟⲛ ⲛⲓⲙ ⲁⲉⲓⲟⲩⲟⲛ̣[ϩⲧ·] <text:line-break/><text:span text:style-name="T1"> </text:span><text:span text:style-name="T2">(45/22) </text:span> ⲉⲃⲟⲗ ϩⲣⲁⲓ̈ ⲛ̅ϩⲏⲧⲟⲩ ⲁⲩⲱ ⲁⲩⲣ̅ⲉⲡⲓⲑⲩⲙⲉⲓ ⲉⲣ̣[ⲟ] <text:line-break/><text:span text:style-name="T1"> </text:span><text:span text:style-name="T2">(45/23) </text:span> ⲉⲓ ⲛ̅ϭⲓ ⲙⲉⲉⲩⲉ ⲛⲓⲙ ⲉⲩϣⲓⲛⲉ ⲛ̅ⲥⲱⲉⲓ ϫⲉ ⲁⲛⲟ̣[ⲕ] <text:line-break/><text:span text:style-name="T1"> </text:span><text:span text:style-name="T2">(45/24) </text:span> ⲡⲉⲛⲧⲁⲓ̈ϯ ϩⲓⲕⲱⲛ ⲙ̅ⲡⲧⲏⲣϥ ⲛⲉⲙⲛ̅ⲧⲉⲩ ⲙⲟ[ⲣ] <text:line-break/><text:span text:style-name="T1"> </text:span><text:span text:style-name="T2">(45/25) </text:span> ⲫⲏ ⲙ̅ⲙⲁⲩ ⲡⲉ ⲁⲩⲱ ⲁⲉⲓϣⲓⲃⲉ ⲛ̅ⲛⲉⲩⲙⲟⲣⲫⲏ̣ <text:line-break/><text:span text:style-name="T1"> </text:span><text:span text:style-name="T2">(45/26) </text:span> ϩⲛ̅ ϩⲉⲛⲙⲟⲣⲫⲏ ϣⲁ ⲡⲟⲩⲟⲉⲓϣ ⲉⲧⲟⲩⲛⲁϯ <text:line-break/><text:span text:style-name="T1"> </text:span><text:span text:style-name="T2">(45/27) </text:span> ⲙⲟⲣⲫⲏ ⲙ̅ⲡⲧⲏⲣϥ ⲉⲃⲟⲗ ϩⲓⲧⲟⲟⲧ%6 ⲛ̅ⲧⲁⲡϩⲣ̣[ⲟ] <text:line-break/><text:span text:style-name="T1"> </text:span><text:span text:style-name="T2">(45/28) </text:span> ⲟⲩ ϣⲱⲡⲉ ⲁⲩⲱ ⲁⲛⲟⲕ ⲡⲉⲛⲧⲁⲓ̈ⲕⲱ ⲙ̅ⲡⲛ[ⲓ] <text:line-break/><text:span text:style-name="T1"> </text:span><text:span text:style-name="T2">(45/29) </text:span> ϥⲉ ϩⲣⲁⲓ̈ ϩⲛ̅ ⲛⲉⲧ%6ⲉ ⲛⲱⲓ̈ ⲁⲩⲱ ⲡⲡ̅ⲛ̅ⲁ̅ ⲉⲧⲟⲩⲁ <text:line-break/><text:span text:style-name="T1"> </text:span><text:span text:style-name="T2">(45/30) </text:span> ⲁⲃ ϣⲁ ⲉⲛⲉϩ ⲁⲉⲓⲛⲟϫϥ̣ ⲉϩⲣⲁⲓ̈ ⲉⲣⲟⲟⲩ ⲁⲩⲱ <text:line-break/><text:span text:style-name="T1"> </text:span><text:span text:style-name="T2">(45/31) </text:span> ⲁⲉⲓⲃⲱⲕ̓ ⲁⲧⲡⲉ ⲁⲉⲓ̣ϣⲉ ⲉϩ̣ⲟⲩⲛ ⲁⲡⲁⲟⲩⲟⲉⲓ̅ <text:line-break/><text:span text:style-name="T1"> </text:span><text:span text:style-name="T2">(45/32) </text:span> ⲛⲉ ⲁⲉ̣[ⲓⲃⲱⲕ] ⲉ̣ϩ̣[ⲣⲁ]ⲓ̣̈ ⲁϫⲛ̅ ⲡⲁⲕⲗⲁⲇⲟⲥ ⲁⲉ̣ⲓ <text:line-break/><text:span text:style-name="T1"> </text:span><text:span text:style-name="T2">(45/33) </text:span> ϩⲙⲉⲥ̣[ⲧ%6 ⲙ̅ⲙⲁⲩ ϩⲣⲁⲓ̈ ϩ̅ⲛ̅ ⲛ̅]ϣⲏⲣⲉ ⲙ̅ⲡⲟⲩⲟⲉ̣ⲓ̣[ⲛ] <text:line-break/><text:span text:style-name="T1"> </text:span><text:span text:style-name="T2">(45/34) </text:span> ⲉⲧⲟⲩ̣[ⲁⲁⲃ ⲁⲉⲓⲣ̅ⲁⲛⲁⲭⲱⲣⲓ] ⲇⲉ ⲁⲡⲟⲩⲙⲁ ⲛ̅ϣ̣[ⲱ] <text:line-break/><text:span text:style-name="T1"> </text:span><text:span text:style-name="T2">(46/1) </text:span> ⲡⲉ ⲡⲁⲓ̈ ⲉ[ⲧ <text:line-break/><text:span text:style-name="T1"> </text:span><text:span text:style-name="T2">(46/2) </text:span> [.].ⲉ ⲙ̅ⲡ̣[ 20+- ]. <text:line-break/><text:span text:style-name="T1"> </text:span><text:span text:style-name="T2">(46/3) </text:span> ϣⲱⲡ̣ⲉ ⲛ̅ⲉ̣[ⲟⲟⲩ 12+- ϩⲁⲙ]ⲏⲛ <text:line-break/><text:span text:style-name="T1"> </text:span><text:span text:style-name="T2">(46/4) </text:span> [ 8+- ]ʹ26 [ <text:line-break/><text:span text:style-name="T1"> </text:span><text:span text:style-name="T2">(46/5) </text:span> [ⲡⲁⲧϩⲓⲙⲁ]ⲣ̣ⲙⲉⲛⲏ[ ⲃ̅] <text:line-break/><text:span text:style-name="T1"> </text:span><text:span text:style-name="T2">(46/6) </text:span> [ 6+-]ʹ26 [ <text:line-break/><text:span text:style-name="T1"> </text:span><text:span text:style-name="T2">(46/7) </text:span> ⲁⲛⲟⲕ ⲡⲉ ⲡ̣[ⲗⲟⲅ]ⲟ̣ⲥ ⲉⲧϣⲟⲟ̣[ⲡ ϩⲙ̅ ⲡⲓϩⲣⲟⲟⲩ] <text:line-break/><text:span text:style-name="T1"> </text:span><text:span text:style-name="T2">(46/8) </text:span> ⲛ̅ⲁⲧ̓ϣⲁϫⲉ ⲉⲣ̣ⲟϥ· ⲉⲉⲓϣⲟ[ⲟ]ⲡ̣ ϩⲛ̣̅ [ⲟⲩⲟⲉⲓⲛⲉ] <text:line-break/><text:span text:style-name="T1"> </text:span><text:span text:style-name="T2">(46/9) </text:span> ⲛ̅ⲁⲧϫⲱϩⲙⲉ ⲁⲩⲱ ⲟⲩⲙⲉⲉⲩⲉ ⲁϥϭ[ⲟⲗⲡϥ’ ⲉⲃⲟⲗ] <text:line-break/><text:span text:style-name="T1"> </text:span><text:span text:style-name="T2">(46/10) </text:span> ϩ̣ⲛ̅ ⲟⲩⲁⲓⲥⲑⲏⲥⲓⲥ ⲉⲃⲟⲗ ϩⲓⲧⲟⲟⲧ̣ⲥ ⲛ̣̅[ϯⲛⲟϭ ⲛ̅] <text:line-break/><text:span text:style-name="T1"> </text:span><text:span text:style-name="T2">(46/11) </text:span> ⲥⲙⲏ ⲛ̅ⲧⲉ ⲧⲙⲁⲁⲩ ⲉⲩϫⲡⲟ ⲛ̅ϩⲟⲟⲩⲧ ϥ̣[ⲓ ϩⲁⲣⲟⲓ̈] <text:line-break/><text:span text:style-name="T1"> </text:span><text:span text:style-name="T2">(46/12) </text:span> ⲛ̅ⲕⲁⲁⲧ%6 ⲉϩⲣⲁⲓ̈ ⲁⲩⲱ ⲉⲥϣⲟⲟⲡ%6 ϫⲛ̅ ⲛ̅ϣⲟ̣[ⲣⲡ] <text:line-break/><text:span text:style-name="T1"> </text:span><text:span text:style-name="T2">(46/13) </text:span> ϩⲛ̅ ⲛ̅ⲕⲁⲁⲥ ⲙ̅ⲡⲧⲏⲣϥ· ⲟⲩⲛ̅ ⲟⲩⲟⲉⲓⲛⲉ ⲇⲉ [ⲉϥ] <text:line-break/><text:span text:style-name="T1"> </text:span><text:span text:style-name="T2">(46/14) </text:span> ϣⲟⲟⲡ ⲉϥϩⲏⲡ ϩⲣⲁⲓ̈ ϩⲛ̅ ⲥⲓⲅⲏ ⲁϥⲣ̅ϣⲟⲣⲡ ⲛ̣̅ⲉ̣[ⲓ] <text:line-break/><text:span text:style-name="T1"> </text:span><text:span text:style-name="T2">(46/15) </text:span> ⲉⲃⲟⲗ ⲛ̅ⲧⲟⲥ ⲇⲉ ⲟⲩⲁⲁⲧⲥ̅ ⲉⲥϣⲟⲟⲡ ⲛ̅ⲕⲁⲣⲱϥ̣ <text:line-break/><text:span text:style-name="T1"> </text:span><text:span text:style-name="T2">(46/16) </text:span> ⲁⲛⲟⲕ ⲡⲉ ⲡⲗⲟⲅⲟⲥ ⲟⲩⲁⲁⲧ· ⲛ̅ⲁⲧϣⲁϫⲉ ⲙ̅ⲙⲟ[ϥ] <text:line-break/><text:span text:style-name="T1"> </text:span><text:span text:style-name="T2">(46/17) </text:span> ⲛ̅ⲁⲧϫⲱϩⲙⲉ ⲛ̅ⲁⲧϣⲓⲧϥ· ⲛ̅ⲁⲧⲙⲉⲉⲩⲉ ⲉⲣⲟϥ <text:line-break/><text:span text:style-name="T1"> </text:span><text:span text:style-name="T2">(46/18) </text:span> ⲟⲩⲟⲉⲓⲛⲉ ⲉϥϩⲏⲡ%6 ⲡⲉ ⲉϥϯ ⲛ̅ⲟⲩⲕⲁⲣⲡⲟⲥ ⲛ̅ <text:line-break/><text:span text:style-name="T1"> </text:span><text:span text:style-name="T2">(46/19) </text:span> ⲱⲛϩ ⲉϥⲃⲉⲉⲃⲉ ⲛ̅ⲟⲩⲙⲟⲟⲩ ⲛ̅ⲱⲛ̣ϩ̣ ⲉ̣ⲃ̣ⲟ̣ⲗ̣ <text:line-break/><text:span text:style-name="T1"> </text:span><text:span text:style-name="T2">(46/20) </text:span> ϩⲛ̅ ⲧⲡⲏⲅⲏ ⲛ̅ⲁⲧ̓ⲛⲁⲩ ⲉⲣⲟⲥ ⲛ̅ⲁⲧϫⲱϩⲙⲉ <text:line-break/><text:span text:style-name="T1"> </text:span><text:span text:style-name="T2">(46/21) </text:span> ⲛ̅ⲁⲧϣⲓⲧϥ· ⲉⲧⲉ ⲡⲁⲓ̈ ⲡⲉ ⲡϩⲣⲟⲟⲩ ⲙ̅ⲡⲉⲟⲟⲩ <text:line-break/><text:span text:style-name="T1"> </text:span><text:span text:style-name="T2">(46/22) </text:span> ⲛ̅ⲧⲙⲁⲩ ⲛ̅ⲁⲧⲟⲩⲁϩⲙⲉϥ̓ ⲡⲉⲟⲟⲩ ⲙ̅ⲡϫⲡⲟ <text:line-break/><text:span text:style-name="T1"> </text:span><text:span text:style-name="T2">(46/23) </text:span> ⲙ̅ⲡⲛⲟⲩⲧⲉ ⲟⲩⲡⲁⲣⲑⲉⲛⲟⲥ ⲛ̅ϩⲟⲟⲩⲧ%6 ⲉⲃⲟⲗ <text:line-break/><text:span text:style-name="T1"> </text:span><text:span text:style-name="T2">(46/24) </text:span> ϩⲓⲧⲟⲟⲧϥ· ⲛ̅ⲟⲩⲛⲟⲩⲥ ⲉϥϩⲏⲡ ⲉⲧⲉ ⲧⲁⲓ̈ ⲧⲉ <text:line-break/><text:span text:style-name="T1"> </text:span><text:span text:style-name="T2">(46/25) </text:span> ⲧⲙⲛ̅ⲧⲕⲁⲣⲱⲥ ⲉⲥϩⲏⲡ· ⲁⲡⲧⲏⲣϥ ⲉⲥⲟ ⲛ̅ⲁⲧⲟⲩ <text:line-break/><text:span text:style-name="T1"> </text:span><text:span text:style-name="T2">(46/26) </text:span> ⲁϩⲙⲉⲥ ⲟⲩⲟⲉⲓⲛ ⲛ̅ⲁⲧ%6ϣⲓⲧϥ· ⲧⲡⲏⲅⲏ ⲙ̅ⲡⲧⲏ̣[ⲣ]ϥ̣ <text:line-break/><text:span text:style-name="T1"> </text:span><text:span text:style-name="T2">(46/27) </text:span> ⲧⲛⲟⲩⲛⲉ ⲙ̅ⲡⲁⲓⲱⲛ ⲧⲏⲣϥ ⲧⲃⲁⲥⲓⲥ ⲧⲉ ⲉⲧϥⲓ̣ <text:line-break/><text:span text:style-name="T1"> </text:span><text:span text:style-name="T2">(46/28) </text:span> ⲉϩⲣⲁⲓ̈ ϩⲁ ⲕⲓⲛⲏⲥⲓⲥ ⲛⲓⲙ ⲛ̅ⲧⲉ ⲛ̅ⲁⲓⲱⲛ ⲉ[ⲧ] <text:line-break/><text:span text:style-name="T1"> </text:span><text:span text:style-name="T2">(46/29) </text:span> ⲏⲡ· ⲁⲡⲉⲟⲟⲩ ⲉⲧϫⲟⲟⲣ· ⲡⲕⲱ ⲉϩⲣⲁⲓ̈ ⲡⲉ ⲛ̅ⲃ[ⲁ] <text:line-break/><text:span text:style-name="T1"> </text:span><text:span text:style-name="T2">(46/30) </text:span> ⲥⲓⲥ ⲛⲓⲙ ⲡⲛⲓϥⲉ ⲡⲉ ⲛ̅ⲛ̅ϭⲁⲙ ⲡⲃⲁⲗ ⲡⲉ ⲛ̣̅ <text:line-break/><text:span text:style-name="T1"> </text:span><text:span text:style-name="T2">(46/31) </text:span> ϯϣⲟⲙⲧⲉ ⲙ̅ⲙⲟⲛⲏ ⲉⲥϣⲟⲟⲡ· ⲛ̅ϩⲣⲟⲟⲩ <text:line-break/><text:soft-page-break/><text:span text:style-name="T1"> </text:span><text:span text:style-name="T2">(46/32) </text:span> ⲉⲃⲟⲗ ϩⲓⲧⲟⲟⲧϥ· ⲛ̅ⲟⲩⲙⲉⲉⲩⲉ ⲁⲩⲱ ⲟⲩⲗⲟ <text:line-break/><text:span text:style-name="T1"> </text:span><text:span text:style-name="T2">(46/33) </text:span> ⲅⲟⲥ ⲡⲉ ⲉⲃⲟⲗ ϩⲓⲧⲟⲟⲧⲥ ⲛ̅ⲧⲥⲙⲏ ⲛ̅ⲧⲁⲩⲧⲛ̣̅ <text:line-break/><text:span text:style-name="T1"> </text:span><text:span text:style-name="T2">(46/34) </text:span> ⲛⲟⲟⲩϥ· ⲁⲣ̅ⲟⲩⲟⲉ̣ⲓⲛ ⲁⲛⲉⲧϣⲟⲟⲡ ϩⲙ̅ ⲡⲕ[ⲁ] <text:line-break/><text:span text:style-name="T1"> </text:span><text:span text:style-name="T2">(46/35) </text:span> [ⲕ]ⲉ ⲉⲓⲥ ϩⲏⲏⲧⲉ ϭⲉ ⲁ[ⲛⲟ]ⲕ̣ ϯ̣[ⲛⲁⲟⲩ]ⲱⲛϩ <text:line-break/><text:span text:style-name="T1"> </text:span><text:span text:style-name="T2">(46/36) </text:span> ⲛ̣ⲏⲧⲛ̅ ⲉⲃⲟⲗ ⲛ̣̅[ⲛⲁⲙⲩⲥⲧⲏⲣⲓⲟⲛ] ϫⲉ ⲛ̅ <text:line-break/><text:span text:style-name="T1"> </text:span><text:span text:style-name="T2">(46/37) </text:span> ⲧ̣ⲱⲧⲛ̅ ⲛⲁϣⲃⲣ̣[ⲥⲛⲏⲩ ⲁⲩⲱ ⲧⲉⲧⲛⲁ]ⲥ̣[ⲟ]ⲩⲱ̣ <text:line-break/><text:span text:style-name="T1"> </text:span><text:span text:style-name="T2">(46/38) </text:span> ⲛ̣ⲟⲩ ⲧⲏⲣ[ⲟ]ⲩ̣ [ <text:line-break/><text:span text:style-name="T1"> </text:span><text:span text:style-name="T2">(47/4) </text:span> (Lines 1-4 lacking) <text:line-break/><text:span text:style-name="T1"> </text:span><text:span text:style-name="T2">(47/5) </text:span> [ 13+- ]ⲁ̣ⲉ̣ⲓ̣ⲧ̣ⲁ̣[ⲙ]ⲟ̣[ⲟⲩ ⲧⲏⲣⲟⲩ ⲉ] <text:line-break/><text:span text:style-name="T1"> </text:span><text:span text:style-name="T2">(47/6) </text:span> [ⲛⲁⲙⲩⲥⲧⲏⲣ]ⲓ̣ⲟⲛ̣ ⲉⲧϣⲟⲟⲡ%6 ϩⲛ̣̅ [ⲛⲓⲁⲓⲱⲛ ⲛ̅] <text:line-break/><text:span text:style-name="T1"> </text:span><text:span text:style-name="T2">(47/7) </text:span> [ⲁⲧ̓ⲧⲉϩⲟⲟⲩ ⲛ̅]ⲁ̣ⲧ’ϫⲟⲟⲩ ⲁⲉⲓⲧⲥⲉ[ⲃⲟⲟⲩ ⲁⲛⲙⲩ] <text:line-break/><text:span text:style-name="T1"> </text:span><text:span text:style-name="T2">(47/8) </text:span> [ⲥⲧⲏⲣⲓ]ⲟ̣ⲛ ⲉⲃⲟⲗ ϩⲓⲧⲟⲟⲧϥ̅ ⲙ̅ⲡϩ[ⲣⲟⲟⲩ ⲉⲧ] <text:line-break/><text:span text:style-name="T1"> </text:span><text:span text:style-name="T2">(47/9) </text:span> [ϣⲟⲟⲡ] ϩⲣⲁⲓ̈ ϩⲛ̅ ⲟⲩⲛⲟⲩⲥ ⲛ̅ⲧⲉⲗⲉⲓⲟ̣[ⲥ ⲁⲩⲱ] <text:line-break/><text:span text:style-name="T1"> </text:span><text:span text:style-name="T2">(47/10) </text:span> [ⲁⲉⲓ]ϣ̣ⲱⲡⲉ ⲛ̅ⲕⲱ ⲉϩⲣⲁⲓ̈ ⲙ̅ⲡⲧⲏⲣϥ̓ ⲁⲩⲱ̣ [ⲁⲉⲓϯ] <text:line-break/><text:span text:style-name="T1"> </text:span><text:span text:style-name="T2">(47/11) </text:span> [ϭ]ⲟ̣ⲙ’ ⲛⲁⲩ ⲡⲙⲁϩⲥⲉⲡ̓ⲥⲛⲁⲩ ⲁⲓ̈ⲉⲓ ϩⲛ̅ ⲧ̣[ⲥⲙⲏ] <text:line-break/><text:span text:style-name="T1"> </text:span><text:span text:style-name="T2">(47/12) </text:span> ⲙ̅ⲡⲁϩⲣⲟⲟⲩ ⲁⲉⲓϯ ϩⲓⲕⲱⲛ ⲛ̅ⲛⲉⲛⲧⲁⲩϫ̣[ⲓ ϩ]ⲓ̣ <text:line-break/><text:span text:style-name="T1"> </text:span><text:span text:style-name="T2">(47/13) </text:span> ⲕ̣ⲱⲛ ϣⲁϩⲟⲩⲛ ⲁⲧⲟⲩⲥⲩⲛⲧⲉⲗⲉⲓⲁ ⲡⲙ̣[ⲁ]ϩ <text:line-break/><text:span text:style-name="T1"> </text:span><text:span text:style-name="T2">(47/14) </text:span> ϣⲟⲙⲧ̓ ⲛ̅ⲥⲟⲡ̓ ⲁⲉⲓⲟⲩⲟⲛϩⲧ̓ ⲉⲃⲟⲗ ⲛⲁⲩ [ϩ]ⲛ̅ <text:line-break/><text:span text:style-name="T1"> </text:span><text:span text:style-name="T2">(47/15) </text:span> ⲛ̣ⲉⲩⲥⲕⲏⲛⲏ ⲉⲉⲓϣⲟⲟⲡ· ⲛ̅ⲗⲟⲅⲟⲥ ⲁⲩⲱ ⲁ̣ⲉⲓ <text:line-break/><text:span text:style-name="T1"> </text:span><text:span text:style-name="T2">(47/16) </text:span> ⲟⲩⲟⲛϩⲧ̓ ⲉⲃⲟⲗ ϩⲙ̅ ⲡⲉⲓⲛⲉ ⲛ̅ⲧⲟⲩϩⲓⲕⲱⲛ̣ ⲁⲩ <text:line-break/><text:span text:style-name="T1"> </text:span><text:span text:style-name="T2">(47/17) </text:span> ⲱ ⲁⲉⲓⲣ̅ⲫⲟⲣⲓ ⲛ̅ⲧⲟⲩϩⲃⲥⲱ ⲛ̅ⲟⲩⲟⲛ ⲛⲓⲙ̣ ⲁⲩ <text:line-break/><text:span text:style-name="T1"> </text:span><text:span text:style-name="T2">(47/18) </text:span> ⲱ ⲁⲉⲓϩⲟⲡⲧ ⲟⲩⲁⲁⲧ· ϩⲣⲁⲓ̈ ⲛ̅ϩⲏⲧⲟⲩ ⲁⲩⲱ ⲙ̅ⲡ[ⲟⲩ] <text:line-break/><text:span text:style-name="T1"> </text:span><text:span text:style-name="T2">(47/19) </text:span> ⲥⲟⲩⲱⲛ ⲡⲉⲧϯ ϭⲟⲙ ⲛⲁⲓ̈ ϯϣⲟⲟⲡ ⲅⲁⲣ ϩⲣⲁⲓ̣̈ <text:line-break/><text:span text:style-name="T1"> </text:span><text:span text:style-name="T2">(47/20) </text:span> ϩ̣ⲛ̅ ⲛ̅ⲁⲣⲭⲏ ⲧⲏⲣⲟⲩ ⲙⲛ̅ ⲛ̅ⲇⲩⲛⲁⲙⲓⲥ ⲁⲩⲱ ϩⲣ̣ⲁ̣ⲓ̈ <text:line-break/><text:span text:style-name="T1"> </text:span><text:span text:style-name="T2">(47/21) </text:span> ϩⲛ̅ ⲛ̅ⲁⲅⲅⲉⲗⲟⲥ ⲁⲩⲱ ϩⲛ̅ ⲕⲓⲛⲏⲥⲓⲥ ⲛⲓⲙ ⲉ[ⲧϣ]ⲟ <text:line-break/><text:span text:style-name="T1"> </text:span><text:span text:style-name="T2">(47/22) </text:span> ⲟⲡ· ϩⲛ̅ ⲧϩⲩⲗⲏ ⲧⲏⲣⲥ̅ ⲁⲩⲱ ⲁⲉⲓϩⲟⲡⲧ· ϩⲣⲁ̣[ⲓ̈] ⲛ̣̅ <text:line-break/><text:span text:style-name="T1"> </text:span><text:span text:style-name="T2">(47/23) </text:span> ϩⲏⲧⲟⲩ ϣⲁⲛϯⲟⲩⲟⲛϩⲧ̓ ⲉⲃⲟⲗ ⲛ̅ⲛⲁⲥⲛⲏ̣[ⲩ] <text:line-break/><text:span text:style-name="T1"> </text:span><text:span text:style-name="T2">(47/24) </text:span> ⲁⲩⲱ ⲙ̅ⲡⲉⲗⲁⲁⲩ ⲛ̅ϩⲏⲧⲟⲩ ⲥⲟⲩⲱⲛⲧ· ⲕⲁ̣[ⲓⲧⲟⲓ] <text:line-break/><text:span text:style-name="T1"> </text:span><text:span text:style-name="T2">(47/25) </text:span> ⲁⲛⲟⲕ̓ ⲡⲉⲧⲣ̅ⲉⲛⲉⲣⲅⲉⲓ ⲛ̅ϩⲏⲧⲟⲩ ⲁⲗⲗ[ⲁ ⲁⲩⲙⲉ] <text:line-break/><text:span text:style-name="T1"> </text:span><text:span text:style-name="T2">(47/26) </text:span> ⲉⲩⲉ ϫⲉ ⲛ̅ⲧⲁⲩⲥⲱⲛⲧ ⲙ̅ⲡⲧⲏⲣϥ ⲉⲃⲟⲗ ⲛ̣̅ϩ̣[ⲏⲧⲟⲩ] <text:line-break/><text:span text:style-name="T1"> </text:span><text:span text:style-name="T2">(47/27) </text:span> ⲉⲩⲟ ⲛ̅ⲁⲧⲥⲟⲟⲩⲛⲉ ⲉⲛⲥⲉⲥⲟⲟⲩⲛ ⲁⲛ ⲛ̣̅ⲧ̣[ⲟⲩ] <text:line-break/><text:span text:style-name="T1"> </text:span><text:span text:style-name="T2">(47/28) </text:span> ⲛⲟⲩⲛⲉ ⲡⲙⲁ ⲛ̅ⲧⲁⲩⲣⲱⲧ· ϩⲣⲁⲓ̈ ⲛ̅ϩⲏⲧϥ ⲁ̣[ⲛⲟⲕ] <text:line-break/><text:span text:style-name="T1"> </text:span><text:span text:style-name="T2">(47/29) </text:span> ⲡⲉ ⲡⲟⲩⲟⲉⲓⲛ ⲉⲧϯ ⲟⲩⲟⲉⲓⲛⲉ ⲙ̅ⲡⲧⲏ[ⲣϥ ⲁ] <text:line-break/><text:span text:style-name="T1"> </text:span><text:span text:style-name="T2">(47/30) </text:span> ⲛⲟⲕ ⲡⲉ ⲡⲟⲩⲟⲉⲓⲛ ⲉⲧⲣⲁϣⲉ ϩⲣ[ⲁⲓ̈ ϩⲛ̅ ⲛⲁ] <text:line-break/><text:span text:style-name="T1"> </text:span><text:span text:style-name="T2">(47/31) </text:span> ⲥⲛⲏⲩ ⲁⲉⲓⲉⲓ ⲅⲁⲣ ⲉϩⲣⲁⲓ̈ ⲉⲡⲕⲟⲥⲙⲟⲥ [ⲛ̅ⲛ̅] <text:line-break/><text:span text:style-name="T1"> </text:span><text:span text:style-name="T2">(47/32) </text:span> ⲣ̣ⲉϥⲙⲟⲩ ⲉⲧⲃⲉ ⲡⲡⲛ̅ⲁ̅ ⲉⲧⲥⲟϫⲡ· ϩⲣⲁ̣[ⲓ̈ ϩⲙ̅] <text:line-break/><text:span text:style-name="T1"> </text:span><text:span text:style-name="T2">(47/33) </text:span> ⲡⲁⲓ̈ ⲛ̅ⲧⲁ̣[ϥⲃⲱⲕ ⲉϩⲣ]ⲁ̣ⲓ̣̈ ⲛ̅ⲧⲁϥⲉⲓ ⲉⲃⲟⲗ [ϩⲛ̅] ⲧ̣ⲥ̣ⲟ̣ <text:line-break/><text:span text:style-name="T1"> </text:span><text:span text:style-name="T2">(47/34) </text:span> ⲫⲓⲁ ⲛ̅[ⲁⲧⲡⲉⲑⲟⲟⲩ ⲁⲉⲓⲉⲓ] ⲁⲩⲱ ⲁⲓ̈[ϯ ⲉ]ϩⲣⲁ̣[ⲓ̈] <text:line-break/><text:span text:style-name="T1"> </text:span><text:span text:style-name="T2">(47/35) </text:span> [ 17+- ].[ⲁ]ⲩⲱ ⲁⲉⲓ̣[ⲃⲱ]ⲕ̓ ⲁ <text:line-break/><text:span text:style-name="T1"> </text:span><text:span text:style-name="T2">(48/4) </text:span> [ Lines 1-4 lacking <text:line-break/><text:span text:style-name="T1"> </text:span><text:span text:style-name="T2">(48/5) </text:span> [ 13+- ]...[ <text:line-break/><text:span text:style-name="T1"> </text:span><text:span text:style-name="T2">(48/6) </text:span> [ 8+- ]ⲉ̣ⲧⲉ̣ ⲛⲉⲩⲛ̅ⲧⲁⲁϥ̣ ϫ̣ⲛ̣̅ [ⲛ̅ϣⲟⲣⲡ· ⲁⲩⲱ] <text:line-break/><text:span text:style-name="T1"> </text:span><text:span text:style-name="T2">(48/7) </text:span> [ⲁⲓ̈ϯ ⲛⲁϥ] ⲉ̣ⲃⲟⲗ ϩⲙ̅ ⲡⲙⲟⲟⲩ̣ ⲙ̣̅[ⲡⲱⲛϩ ⲡⲁⲓ̈ ⲉⲧ] <text:line-break/><text:span text:style-name="T1"> </text:span><text:span text:style-name="T2">(48/8) </text:span> [ⲕⲱⲕ ⲙ̅]ⲙ̣ⲟϥ̓ ⲁϩⲏⲩ ⲙ̅ⲡⲭⲁⲟⲥ ⲡⲁⲓ̈ ⲉ[ⲧϣⲟⲟⲡ] <text:line-break/><text:span text:style-name="T1"> </text:span><text:span text:style-name="T2">(48/9) </text:span> [ϩⲙ̅ ⲡⲕⲁ]ⲕⲉ ⲛ̅ϩⲁⲉ ⲉⲧϣⲟⲟⲡ̓ ⲙ̅ⲡⲥⲁⲛ[ϩⲟⲩⲛ ⲙ̅] <text:line-break/><text:span text:style-name="T1"> </text:span><text:span text:style-name="T2">(48/10) </text:span> [ⲡϣⲓ]ⲕⲉ ⲧⲏⲣϥ̓ ⲉⲧⲉ ⲡⲁⲓ̈ ⲡⲉ ⲡⲙⲉⲉⲩⲉ ⲛ̣̅[ⲧⲥⲱ] <text:line-break/><text:span text:style-name="T1"> </text:span><text:span text:style-name="T2">(48/11) </text:span> [ⲙⲁ]ⲧ̣ⲓⲕⲏ ⲙⲛ̅ ⲧⲯⲩⲭⲓⲕⲏ ⲛⲁⲓ̈ ⲧⲏⲣⲟⲩ ⲁⲛⲟ̣[ⲕ] <text:line-break/><text:soft-page-break/><text:span text:style-name="T1"> </text:span><text:span text:style-name="T2">(48/12) </text:span> [ⲁⲉ]ⲓ̣ⲧⲁⲁⲩ ϩⲓⲱⲱⲧ· ⲁⲉⲓⲕⲁⲕ̅ϥ̅ ⲇⲉ ⲁϩⲏⲩ ⲙ̅ⲙⲟⲥ <text:line-break/><text:span text:style-name="T1"> </text:span><text:span text:style-name="T2">(48/13) </text:span> [ⲁⲓ̈]ϯ ϩⲓⲱⲱϥ ⲛ̅ⲟⲩⲟⲉⲓⲛⲉ ⲉϥⲡⲣ̅ⲣⲓⲱⲟⲩ ⲉⲧⲉ̣ <text:line-break/><text:span text:style-name="T1"> </text:span><text:span text:style-name="T2">(48/14) </text:span> ⲡ̣ⲁ̣ⲓ̈ ⲡⲉ ⲡⲥⲟⲟⲩⲛⲉ ⲙ̅ⲡⲙⲉⲉⲩⲉ ⲛ̅ⲧⲙ̅ⲛ̅ⲧ̅ⲉⲓⲱ̣[ⲧ] <text:line-break/><text:span text:style-name="T1"> </text:span><text:span text:style-name="T2">(48/15) </text:span> ⲁ̣ⲩ̣ⲱ ⲁⲉⲓϯ ⲙ̅ⲙⲟϥ ⲁⲧⲟⲟⲧⲟⲩ ⲛ̅ⲛⲉϯ ⲥⲧⲟⲗⲏ <text:line-break/><text:span text:style-name="T1"> </text:span><text:span text:style-name="T2">(48/16) </text:span> ⲓ̣ⲁ̣̅̅ⲙ̅ⲙ̅ⲱ̅ⲛ̅ ⲉⲗ̅ⲁⲥⲥⲱ̅ ⲁⲙ̅ⲏⲛⲁⲓ̅ ⲁⲩⲱ ⲁⲩϭ̣[ⲟ] <text:line-break/><text:span text:style-name="T1"> </text:span><text:span text:style-name="T2">(48/17) </text:span> ⲟ̣ⲗ̣ⲉϥ ⲛ̅ⲟⲩⲥⲧⲟⲗⲏ ϩⲛ̅ ⲛ̅ⲥⲧⲟⲗⲏ ⲙ̅ⲡⲟⲩⲟⲉⲓⲛ̣ <text:line-break/><text:span text:style-name="T1"> </text:span><text:span text:style-name="T2">(48/18) </text:span> ⲁⲩⲱ ⲁⲉⲓⲧⲁⲁϥ%6 ⲉⲧⲟⲟⲧⲟⲩ ⲛ̅ⲛ̅ⲃⲁⲡⲧⲓⲥⲧⲏⲥ ⲁⲩ̣ <text:line-break/><text:span text:style-name="T1"> </text:span><text:span text:style-name="T2">(48/19) </text:span> ⲣ̣̅ⲃⲁⲡⲧⲓⲍⲉ ⲙ̅ⲙⲟϥ· ⲙⲓ̅ⲭ̅ⲉ̅ⲩ̅ⲥ̅ ⲙⲓ̅ⲭⲁⲣ̅· ⲙⲛ̅[ⲏ]̅ <text:line-break/><text:span text:style-name="T1"> </text:span><text:span text:style-name="T2">(48/20) </text:span> ⲥ̣[ⲓ]ⲛ̅ⲟ̅ⲩ̅ⲥ̅ ⲁⲩϫⲟⲕⲙⲉϥ ⲇⲉ ϩⲛ̅ ⲧⲡⲏⲅⲏ ⲙ̅ⲡⲙ[ⲟ] <text:line-break/><text:span text:style-name="T1"> </text:span><text:span text:style-name="T2">(48/21) </text:span> [ⲟ]ⲩ ⲙ̅ⲡⲱⲛϩ ⲁⲩⲱ ⲁⲉⲓⲧⲁⲁϥ ⲉⲧⲟⲟⲧⲟⲩ ⲛ̅ⲛⲉⲧ <text:line-break/><text:span text:style-name="T1"> </text:span><text:span text:style-name="T2">(48/22) </text:span> [ϯ] ⲑⲣⲟⲛⲟⲥ ⲃⲁ̅ⲣ̅ⲓ̅ⲏ̅ⲗ̅ ⲛⲟⲩ̅ⲑⲁⲛ̅ ⲥⲁⲃⲏⲛⲁⲓ ⲁⲩ <text:line-break/><text:span text:style-name="T1"> </text:span><text:span text:style-name="T2">(48/23) </text:span> [ϯ] ⲑ̣ⲣⲟⲛⲟⲥ ⲛ̣ⲁϥ· ⲉⲃⲟⲗ ϩⲙ̅ ⲡⲑⲣⲟⲛⲟⲥ ⲙ̅ⲡⲉ <text:line-break/><text:span text:style-name="T1"> </text:span><text:span text:style-name="T2">(48/24) </text:span> [ⲟ]ⲟⲩ ⲁⲩⲱ ⲁⲉⲓⲧⲁⲁϥ̓ ⲉⲧⲟⲟⲧⲟⲩ ⲛ̅ⲛⲉⲧϯ ⲉⲟ <text:line-break/><text:span text:style-name="T1"> </text:span><text:span text:style-name="T2">(48/25) </text:span> [ⲟ]ⲩ̣ ⲁ̣ⲣ̅ⲓ̅ⲱ̅ⲙ̅ ⲏⲗ̅ⲓⲉⲛ̅ ⲫⲁ̅ⲣⲓⲏⲗ̅ ⲁⲩϯ ⲉⲟⲟⲩ <text:line-break/><text:span text:style-name="T1"> </text:span><text:span text:style-name="T2">(48/26) </text:span> [ⲛ]ⲁ̣ϥ̣ ϩⲣⲁⲓ̈ ϩⲙ̅ ⲡⲉⲟⲟⲩ ⲛ̅ⲧⲙⲛⲧⲉⲓⲱⲧ· ⲁⲩⲱ’ <text:line-break/><text:span text:style-name="T1"> </text:span><text:span text:style-name="T2">(48/27) </text:span> [ⲁ]ⲩ̣ⲧⲱ̣ⲣⲡ· ⲉϩⲟⲩⲛ ⲛ̅ϭⲓ ⲛⲉⲧ%6ⲧⲱⲣⲡ· ⲕⲁ̅ⲙ̅ⲁ̅ⲗ̅ⲓ̅ⲏ̅[ⲗ] <text:line-break/><text:span text:style-name="T1"> </text:span><text:span text:style-name="T2">(48/28) </text:span> [..].̅ⲁ̅ⲛ̅ⲏ̅ⲛ̅ ⲥⲁⲙ̅ⲃⲗⲱ̅ ⲛ̅ϩⲩ̈ⲡⲏⲣⲉⲧⲏⲥ ⲛ̅〈ⲛ〉ⲛⲟϭ <text:line-break/><text:span text:style-name="T1"> </text:span><text:span text:style-name="T2">(48/29) </text:span> [ⲛ̅ⲫ]ⲱⲥⲧⲏⲣ ⲉⲧⲟⲩⲁⲁⲃ· ⲁⲩϫⲓⲧϥ̓ ⲉϩⲟⲩⲛ ⲁⲡⲧⲟ̣ <text:line-break/><text:span text:style-name="T1"> </text:span><text:span text:style-name="T2">(48/30) </text:span> [ⲡⲟ]ⲥ̣ ⲛ̅ⲟⲩⲟⲉⲓⲛⲉ· ⲛ̅ⲧⲉ ⲧϥⲙ̅ⲛ̅ⲧⲉⲓⲱⲧ̓ ⲁⲩⲱ <text:line-break/><text:span text:style-name="T1"> </text:span><text:span text:style-name="T2">(48/31) </text:span> [ⲁϥϫⲓ] ⲛ̅ⲧϯⲉ ⲛ̅ⲥⲫⲣⲁⲅⲓⲥ ⲉⲃⲟⲗ ϩⲓⲧⲟⲟⲧϥ̓ ⲙ̅ <text:line-break/><text:span text:style-name="T1"> </text:span><text:span text:style-name="T2">(48/32) </text:span> [ⲡⲟⲩⲟ]ⲉⲓⲛ ⲛ̅ⲧⲙⲁⲁⲩ ⲧⲡⲣⲱⲧⲉ̣ⲛ̣ⲛ̣ⲟⲓⲁ ⲁⲩⲱ <text:line-break/><text:span text:style-name="T1"> </text:span><text:span text:style-name="T2">(48/33) </text:span> ⲁ̣ⲩ̣[ϯ] ⲛ̣ⲁϥ· ⲁ{ⲩ}ϫⲓ ⲉⲃⲟⲗ ϩⲙ̣̅ [ⲡⲙⲩⲥⲧⲏⲣ]ⲓ̣ⲟⲛ ⲙ̅ <text:line-break/><text:span text:style-name="T1"> </text:span><text:span text:style-name="T2">(48/34) </text:span> ⲡⲥ[ⲟ]ⲟ̣ⲩⲛⲉ ⲁⲩⲱ̣ [ⲁϥϣⲱⲡⲉ ⲛ̅ⲟⲩⲟⲉⲓ]ⲛ̣ⲉ ϩⲛ̅ <text:line-break/><text:span text:style-name="T1"> </text:span><text:span text:style-name="T2">(48/35) </text:span> ⲟⲩⲟ̣[ⲉ]ⲓⲛⲉ ⲧ’ⲉⲛⲟⲩ ϭⲉ [ 11+- ].[ <text:line-break/><text:span text:style-name="T1"> </text:span><text:span text:style-name="T2">(49/5) </text:span> (Lines 1-5 lacking) <text:line-break/><text:span text:style-name="T1"> </text:span><text:span text:style-name="T2">(49/6) </text:span> [ 7+- ⲛⲉⲉⲓ]ϣⲟ̣ⲟ̣ⲡ̣ ⲛ̣̅ϩⲏ̣ⲧ̣ⲟⲩ [ⲉⲉⲓϩⲙ̅ ⲡⲉⲥ] <text:line-break/><text:span text:style-name="T1"> </text:span><text:span text:style-name="T2">(49/7) </text:span> [ⲙⲟⲧ ⲙ̅ⲡⲟⲩⲁ ⲡ]ⲟⲩⲁ̣ ⲛⲉⲩⲙⲉⲉⲩⲉ ⲛ̣̅[ϭⲓ ⲛ̅ⲁⲣⲭⲱⲛ] <text:line-break/><text:span text:style-name="T1"> </text:span><text:span text:style-name="T2">(49/8) </text:span> [ϫⲉ ⲁⲛⲟⲕ] ⲡ̣ⲉ ⲡⲟⲩⲭⲣ̣ⲥ̅ ⲁⲛⲟⲕ ⲙⲉⲛ [ⲉⲉⲓϣⲟⲟⲡ] <text:line-break/><text:span text:style-name="T1"> </text:span><text:span text:style-name="T2">(49/9) </text:span> [ϩⲛ̅ ⲟⲩⲟⲛ] ⲛ̣ⲓⲙ ϩⲣⲁⲓ̈ ⲙⲉⲛ ϩⲛ̅ ⲛⲉⲛⲧⲁ[ⲉⲓⲟⲩⲟⲛ] <text:line-break/><text:span text:style-name="T1"> </text:span><text:span text:style-name="T2">(49/10) </text:span> [ϩⲧ· ⲉⲃⲟⲗ] ⲛ̣ⲟⲩⲟⲉ̣ⲓ̣ⲛ̣ⲉ ϩⲣⲁⲓ̈ ⲛ̅ϩⲏⲧⲟⲩ̣ [ⲁⲉⲓⲣ̅] <text:line-break/><text:span text:style-name="T1"> </text:span><text:span text:style-name="T2">(49/11) </text:span> [ⲃⲟⲗ] ⲛ̣̅ⲛⲁ̣ⲣ̣ⲭ̣ⲱⲛ ⲁⲛⲟⲕ ⲡⲉ ⲡⲟⲩⲙⲉⲣⲓⲧ [ⲁⲛⲟⲕ] <text:line-break/><text:span text:style-name="T1"> </text:span><text:span text:style-name="T2">(49/12) </text:span> [ⲅ]ⲁⲣ ϩⲙ̅ ⲡⲙⲁ ⲉⲧⲙ̅ⲙⲁⲩ ⲁⲉⲓϯ ϩⲓⲱⲱⲧ ⲛ̅[ⲑⲉ ⲙ̅] <text:line-break/><text:span text:style-name="T1"> </text:span><text:span text:style-name="T2">(49/13) </text:span> ⲡ̣ϣⲏⲣⲉ ⲙ̅ⲡⲁⲣⲭⲓⲅⲉⲛⲉⲧⲱⲣ ⲁⲩⲱ ⲁⲉⲓⲉⲓⲛ̣[ⲉ] ⲙ̣̅ <text:line-break/><text:span text:style-name="T1"> </text:span><text:span text:style-name="T2">(49/14) </text:span> ⲙⲟϥ ⲉϩⲣⲁⲓ̈ ϣⲁ ⲑⲁⲏ ⲙ̅ⲡⲉϥϩⲁⲡ ⲉⲧⲉ ⲧⲁ̣[ⲓ̈ ⲧ]ⲉ <text:line-break/><text:span text:style-name="T1"> </text:span><text:span text:style-name="T2">(49/15) </text:span> ⲧ̣ⲙⲛ̅ⲧ̅ⲁⲧⲥⲟⲟⲩⲛ ⲙ̅ⲡⲭⲁⲟⲥ ⲁⲩⲱ ϩⲣⲁⲓ̈ ϩⲛ̅ ⲛ̅ <text:line-break/><text:span text:style-name="T1"> </text:span><text:span text:style-name="T2">(49/16) </text:span> ⲁⲅⲅⲉⲗⲟⲥ ⲁⲉⲓⲟⲩⲟⲛϩⲧ%6 ⲉⲃⲟⲗ ⲙ̅ⲡⲟⲩⲉ̣[ⲓ]ⲛ̣ⲉ <text:line-break/><text:span text:style-name="T1"> </text:span><text:span text:style-name="T2">(49/17) </text:span> ⲁⲩⲱ ϩⲣⲁⲓ̈ ϩⲛ̅ ⲛ̅ⲇⲩⲛⲁⲙⲓⲥ ϩⲱⲥ ϫⲉ ⲁⲛⲟⲕ’ ⲟⲩⲁ <text:line-break/><text:span text:style-name="T1"> </text:span><text:span text:style-name="T2">(49/18) </text:span> ⲉⲃⲟⲗ ⲛ̅ϩⲏⲧⲟⲩ ϩⲛ̅ ⲛ̅ϣⲏⲣⲉ ⲇⲉ ⲙ̅ⲡⲣⲱⲙⲉ ϩⲱⲥ̣ <text:line-break/><text:span text:style-name="T1"> </text:span><text:span text:style-name="T2">(49/19) </text:span> ϫⲉ ⲁⲛⲟⲕ· ⲟⲩϣⲏⲣⲉ ⲛ̅ⲧⲉ ⲡⲣⲱⲙⲉ ⲉⲉⲓϣⲟⲟⲡ <text:line-break/><text:span text:style-name="T1"> </text:span><text:span text:style-name="T2">(49/20) </text:span> ⲛ̅ⲉⲓⲱⲧ· ⲛ̅ⲟⲩⲟⲛ ⲛⲓⲙ ⲁⲉⲓϩⲟⲡⲧ%6 ϩⲣⲁⲓ̈ ϩⲛ̅ ⲛⲁ <text:line-break/><text:span text:style-name="T1"> </text:span><text:span text:style-name="T2">(49/21) </text:span> ⲉⲓ ⲧⲏⲣⲟⲩ ϣⲁⲛϯⲟⲩⲟⲛϩⲧ%6 ⲉⲃⲟⲗ ϩⲛ̅ ⲛⲁⲙⲉⲗⲟⲥ <text:line-break/><text:span text:style-name="T1"> </text:span><text:span text:style-name="T2">(49/22) </text:span> ⲉⲧⲉ ⲛⲱⲓ̈ ⲛⲉ ⲁⲩⲱ ⲁⲉⲓⲧⲥⲉⲃⲟⲟⲩ ⲁⲛⲧⲱϣ ⲛ̅ <text:line-break/><text:span text:style-name="T1"> </text:span><text:span text:style-name="T2">(49/23) </text:span> ⲁⲧ%6ϣⲁϫⲉ ⲙ̅ⲙⲟⲟⲩ ⲙⲛ̅ ⲛ̅ⲥⲛⲏⲩ ϩⲉⲛ̓ⲁⲧϫⲟⲟⲩ <text:line-break/><text:span text:style-name="T1"> </text:span><text:span text:style-name="T2">(49/24) </text:span> ⲇⲉ ⲛⲉ ⲁⲁⲣⲭⲏ ⲛⲓⲙ ⲁⲩⲱ ⲁⲇⲩⲛⲁⲙⲓⲥ ⲛⲓⲙ̓ ⲛ̣̅ <text:line-break/><text:span text:style-name="T1"> </text:span><text:span text:style-name="T2">(49/25) </text:span> ⲁⲣⲭⲟⲛⲧⲓⲕⲏ ⲉⲓⲙⲏⲧⲓ ⲁⲛϣⲏⲣⲉ ⲙ̅ⲡⲟⲩⲟⲉⲓ[ⲛ]ⲉ <text:line-break/><text:span text:style-name="T1"> </text:span><text:span text:style-name="T2">(49/26) </text:span> ⲟⲩⲁⲁⲧⲟⲩ ⲉⲧⲉ ⲛⲁⲓ̈ ⲛⲉ ⲛ̅ⲧⲱϣ ⲙ̅ⲡⲓⲱⲧ ⲛⲁⲓ̣̈ [ⲛ]ⲉ <text:line-break/><text:span text:style-name="T1"> </text:span><text:span text:style-name="T2">(49/27) </text:span> ⲛⲉⲟⲟⲩ ⲉⲧϫⲟⲥⲉ ⲁⲉⲟⲟⲩ ⲛⲓⲙ ⲉⲧⲉ ⲛⲁⲓ̈ ⲛⲉ [ϯ]ϯ̣ <text:line-break/><text:soft-page-break/><text:span text:style-name="T1"> </text:span><text:span text:style-name="T2">(49/28) </text:span> ⲉ ⲛ̅ⲥⲫⲣⲁⲅⲓⲥ ⲉⲧϫⲏⲕ ⲉⲃⲟⲗ ϩⲓⲧⲛ̅ ⲟⲩⲛⲟⲩⲥ ⲡ̣ⲉ̣ <text:line-break/><text:span text:style-name="T1"> </text:span><text:span text:style-name="T2">(49/29) </text:span> ⲧⲉⲩⲛ̅ⲧⲁϥ ⲙ̅ⲙⲁⲩ ⲛ̅ϯϯⲉ ⲛ̅ⲥⲫⲣⲁⲅⲓⲥ ⲛ̅ⲧⲉ ⲛ̣ⲉ̣ <text:line-break/><text:span text:style-name="T1"> </text:span><text:span text:style-name="T2">(49/30) </text:span> ⲉⲓⲣⲁⲛ ⲉⲧⲉ ⲛⲁⲓ̈ ⲛⲉ ⲁϥⲕⲁⲁⲕϥ ⲁϩⲏⲩ ⲛ̅〈ⲛ̅〉ⲥⲧⲟ̣ <text:line-break/><text:span text:style-name="T1"> </text:span><text:span text:style-name="T2">(49/31) </text:span> ⲗⲏ ⲛ̅ⲧⲙⲛ̅ⲧ̅ⲁⲧⲥⲟⲟⲩⲛ ⲁⲩⲱ ⲁϥϯ ϩⲓⲱⲱϥ̣ <text:line-break/><text:span text:style-name="T1"> </text:span><text:span text:style-name="T2">(49/32) </text:span> ⲛ̅ⲟⲩⲟⲉⲓⲛⲉ ⲉϥⲡⲣ̅ⲣⲓⲱⲟⲩ ⲁⲩⲱ ⲙⲛ̅ⲗⲁⲁⲩ̣ <text:line-break/><text:span text:style-name="T1"> </text:span><text:span text:style-name="T2">(49/33) </text:span> ⲛⲁⲟⲩⲱⲛϩ ⲉⲃⲟⲗ ⲛⲁϥ ⲉϥⲏⲡ̓ ⲁⲛⲇⲩⲛⲁⲙ[ⲓⲥ] <text:line-break/><text:span text:style-name="T1"> </text:span><text:span text:style-name="T2">(49/34) </text:span> ⲛ̅ⲧⲉ ⲛ̅ⲁⲣⲭⲱⲛ ϩⲣⲁⲓ̈ ϩⲛ̅ ⲛⲁⲓ̈ ⲛ̅ⲧⲉⲉⲓⲙⲓⲛⲉ ϥⲛ̣[ⲁ] <text:line-break/><text:span text:style-name="T1"> </text:span><text:span text:style-name="T2">(49/35) </text:span> ⲃⲱⲗ ⲉⲃ[ⲟⲗ] ⲛ̅ϭⲓ ⲡⲕⲁⲕⲉ ⲁⲩⲱ ⲥⲛⲁⲙⲟⲩ ⲛ̅ϭ̣ⲓ̣ <text:line-break/><text:span text:style-name="T1"> </text:span><text:span text:style-name="T2">(49/36) </text:span> ⲧⲙ̅ⲛ̅ⲧ[ⲁⲧⲥⲟⲟⲩⲛ] ⲁ̣[ⲩ]ⲱ̣ ⲡ̣ⲙⲉⲉⲩⲉ ⲙ̅ⲡⲥⲱⲛ̣[ⲧ] <text:line-break/><text:span text:style-name="T1"> </text:span><text:span text:style-name="T2">(49/37) </text:span> ⲉⲧϫ̣[ⲟⲟⲣⲉ ⲉⲃⲟⲗ ϥⲛ]ⲁ̣ϯ ⲟⲩⲥⲙⲟⲧ%6 ⲛ̅ⲟⲩⲱⲧ <text:line-break/><text:span text:style-name="T1"> </text:span><text:span text:style-name="T2">(49/38) </text:span> ⲁⲩⲱ̣ [ⲡⲭⲁⲟⲥ ⲛ̅ⲕⲁⲕⲉ] ϥⲛⲁ̣ⲃ̣ⲱⲗ ⲉⲃⲟⲗ ⲁⲩⲱ <text:line-break/><text:span text:style-name="T1"> </text:span><text:span text:style-name="T2">(50/2) </text:span> (Lines 1-2 lacking) <text:line-break/><text:span text:style-name="T1"> </text:span><text:span text:style-name="T2">(50/3) </text:span> [ 14+- ]ⲉ̣ⲓ̣ⲛ̣ⲉ ⲁⲩⲱ ⲛⲥ[ <text:line-break/><text:span text:style-name="T1"> </text:span><text:span text:style-name="T2">(50/4) </text:span> [ 14+- ].ⲛⲁⲧ̓ⲧⲉϩⲟϥ̣[ <text:line-break/><text:span text:style-name="T1"> </text:span><text:span text:style-name="T2">(50/5) </text:span> [ 11+- ]..[..]ϩⲣⲁⲓ̈ ϩⲛ̅ ⲧ[ <text:line-break/><text:span text:style-name="T1"> </text:span><text:span text:style-name="T2">(50/6) </text:span> [ 7+- ]ϣⲁⲛ̣ϯⲟⲩⲟⲛϩⲧ’ ⲉⲃⲟ̣[ⲗ ⲛ̅ⲛⲁϣⲃⲏⲣ] <text:line-break/><text:span text:style-name="T1"> </text:span><text:span text:style-name="T2">(50/7) </text:span> [ⲛ̅ⲥⲟⲛ ⲧⲏⲣⲟ]ⲩ ⲁⲩⲱ ϣⲁⲛϯⲥⲱⲟⲩ[ϩ ⲉϩⲟⲩⲛ ⲛ̅] <text:line-break/><text:span text:style-name="T1"> </text:span><text:span text:style-name="T2">(50/8) </text:span> [ⲛⲁϣⲃⲏⲣ] ⲛ̣̅ⲥⲟⲛ ⲧⲏⲣⲟⲩ ϩⲣⲁⲓ̈ ϩⲛ̣̅ ⲧⲁⲙ̣[ⲛ̅ⲧ̅ⲣ̅ⲣⲟ] <text:line-break/><text:span text:style-name="T1"> </text:span><text:span text:style-name="T2">(50/9) </text:span> [ⲛ̅ⲉⲛⲉϩ] ⲁ̣ⲩⲱ ⲁⲉⲓⲧⲁϣⲉ ⲟⲉⲓϣ ⲛⲁⲩ ⲛ̅ϯ̣[ϯⲉ] <text:line-break/><text:span text:style-name="T1"> </text:span><text:span text:style-name="T2">(50/10) </text:span> [ⲛ̅ⲥⲫⲣ]ⲁ̣ⲅⲓⲥ ⲛ̅ⲁⲧϣⲁϫⲉ ⲙ̅ⲙⲟⲟⲩ ϫⲉⲕ[ⲁⲁⲥ] <text:line-break/><text:span text:style-name="T1"> </text:span><text:span text:style-name="T2">(50/11) </text:span> [ⲉⲓ̈ⲛⲁ]ϣⲱⲡⲉ ϩⲣⲁⲓ̈ ⲛ̅ϩⲏⲧⲟⲩ ⲁⲩⲱ ⲛ̅ⲧⲟⲟⲩ̣ ϩⲱ̣ <text:line-break/><text:span text:style-name="T1"> </text:span><text:span text:style-name="T2">(50/12) </text:span> [ⲟⲩ] ⲛ̣̅ⲥⲉϣⲱⲡⲉ ϩⲣⲁ ⲛ̅ϩⲏⲧ̓ ⲁⲛⲟⲕ̓ ⲁⲉⲓϯ ⲛ̅ⲓⲏ̅ⲥ̅ <text:line-break/><text:span text:style-name="T1"> </text:span><text:span text:style-name="T2">(50/13) </text:span> ϩ̣ⲓⲱⲱⲧ· ⲁⲉⲓⲉⲓⲛⲉ ⲙ̅ⲙⲟϥ ⲉⲃⲟⲗ ϩⲙ̅ ⲡϣⲉ ⲉⲧ̅ⲥ̅ <text:line-break/><text:span text:style-name="T1"> </text:span><text:span text:style-name="T2">(50/14) </text:span> ϩⲟⲩⲟⲣⲧ̓ ⲁⲩⲱ ⲁⲉⲓⲧⲉϩⲟϥ ⲉⲣⲁⲧϥ’ ϩⲛ̅ ⲙ̅ⲙⲁ ⲛ̅ <text:line-break/><text:span text:style-name="T1"> </text:span><text:span text:style-name="T2">(50/15) </text:span> ϣⲱⲡⲉ ⲙ̅ⲡϥⲉⲓⲱⲧ· ⲁⲩⲱ ⲙ̅ⲡⲟⲩⲥⲟⲩⲱⲛⲧ%6 <text:line-break/><text:span text:style-name="T1"> </text:span><text:span text:style-name="T2">(50/16) </text:span> ⲛ̅ϭⲓ ⲛⲉⲧⲣⲟⲉⲓⲥ ⲁⲛⲉⲩⲙⲁ ⲛ̅ϣⲱⲡⲉ ⲁⲛⲟⲕ <text:line-break/><text:span text:style-name="T1"> </text:span><text:span text:style-name="T2">(50/17) </text:span> ⲅ̣ⲁⲣ ⲁⲛⲟⲕ̓ ⲟⲩⲁⲧ’ⲉⲙⲁϩⲧⲉ ⲙ̅ⲙⲟϥ· ⲙⲛ̅ ⲡⲁ <text:line-break/><text:span text:style-name="T1"> </text:span><text:span text:style-name="T2">(50/18) </text:span> ⲥⲡⲉⲣⲙⲁ ⲁⲩⲱ ⲡⲁⲥⲡⲉⲣⲙⲁ ⲉⲧⲉ ⲡⲱⲓ̈ ⲡⲉ· ϯⲛⲁ̣[ⲕⲁ] <text:line-break/><text:span text:style-name="T1"> </text:span><text:span text:style-name="T2">(50/19) </text:span> ⲁ̣ϥ ⲉϩⲟⲩⲛ ⲁⲡⲟⲩⲟⲉⲓⲛⲉ ⲉⲧⲟⲩⲁⲁⲃ ϩⲣⲁⲓ̈ ϩⲛ̅ ⲟⲩ <text:line-break/><text:span text:style-name="T1"> </text:span><text:span text:style-name="T2">(50/20) </text:span> ⲙⲛ̅ⲧⲕⲁⲣⲱⲥ ⲛ̅ⲁⲧ̓ⲧⲉϩⲟⲥ ϩⲁⲙⲏⲛ· <text:line-break/><text:span text:style-name="T1"> </text:span><text:span text:style-name="T2">(50/21) </text:span> {2̅ⲡ̅ⲗ̅ⲟ̅ⲅ̅ⲟ̅ⲥ̅ ̅̅̅ⲛ̅ⲧ̅ⲉ̅ⲡ̅ⲓ̅ⲫ̅ⲁ̅ⲛ̅ⲓ̅ⲁ̅ ̅̅̅ⲅ}2 <text:line-break/><text:span text:style-name="T1"> </text:span><text:span text:style-name="T2">(50/22) </text:span> {2̅ⲡ̅ⲣ̅ⲱ̅ⲧ̅ⲉ̅ⲛ̅ⲛ̅ⲟ̅ⲓ̅ⲁ̅ ̅ⲧ̅ⲣ̅ⲓ̅ⲙ̅ⲟ̅ⲣ̅ⲫ̅ⲟ̅ⲥ̅ ̅̅̅ⲅ}2 <text:line-break/><text:span text:style-name="T1"> </text:span><text:span text:style-name="T2">(50/23) </text:span> {2̅ⲁ̅ⲅ̅ⲓ̅ⲁ̅ⲅ̅ⲣ̅ⲁ̅ⲫ̅ⲏ̅ ̅ⲡ̅ⲁ̅ⲧ̅ⲣ̅ⲟ̅ⲅ̅ⲣ̅ⲁ̅ⲫ̅ⲟ̅ⲥ}2 <text:line-break/><text:span text:style-name="T1"> </text:span><text:span text:style-name="T2">(50/24) </text:span> {2̅ⲉ̅ⲛ̅ ̅ⲅ̅ⲛ̅ⲱ̅ⲥ̅ⲉ̅ⲓ̅ ̅ⲧ̅ⲉ̅ⲗ̅ⲉ̅ⲓ̅ⲁ̅·}2 </text:p>
      <text:p text:style-name="P1"/>
      <text:p text:style-name="P3">( codex XIII ) On the Origin of the World</text:p>
      <text:p text:style-name="P2"><text:span text:style-name="T1"> </text:span><text:span text:style-name="T2">(50/25) </text:span> [ⲉ]ⲡⲓⲇⲏ ⲟⲩⲟⲛ ⲛⲓⲙ ⲛ̅ⲛⲟⲩⲧⲉ ⲙ̅ⲡⲕⲟⲥⲙⲟⲥ ⲟⲩ[ⲱ] <text:line-break/><text:span text:style-name="T1"> </text:span><text:span text:style-name="T2">(50/26) </text:span> [ⲣ̅]ⲣ̣ⲱⲙⲉ ⲥⲉϫⲱ ⲙ̅ⲙⲟⲥ ϫⲉ ⲙⲛ̅ⲗⲁⲁⲩ ϣⲟⲟⲡ̓ ϩ[ⲁ] <text:line-break/><text:span text:style-name="T1"> </text:span><text:span text:style-name="T2">(50/27) </text:span> ⲧ̣ϩⲏ ⲙ̅ⲡⲭⲁⲟⲥ ⲁⲛⲟⲕ ⲛ̅ⲇⲉ ϯⲛⲁⲣ̅ⲁⲡⲟⲇⲓⲕⲛⲩⲉ <text:line-break/><text:span text:style-name="T1"> </text:span><text:span text:style-name="T2">(50/28) </text:span> [ϫ]ⲉ ⲁⲩⲣ̅ⲡⲗⲁⲛⲁ ⲧⲏⲣⲟⲩ ⲉⲛⲥⲉⲥⲟⲟⲩⲛ 1̅6vacat̅16 <text:line-break/><text:span text:style-name="T1"> </text:span><text:span text:style-name="T2">(50/29) </text:span> ⲁ̣ⲛ ⲛ̅ⲧⲥⲩⲥⲧⲟⲥⲓⲥ ⲙ̅ⲡⲭⲁⲟⲥ ⲙⲛ̅ ⲧⲉϥⲛⲟⲩⲛⲉ ⲧⲁ <text:line-break/><text:span text:style-name="T1"> </text:span><text:span text:style-name="T2">(50/30) </text:span> ⲉⲓⲇⲉ ⲧⲉ ⲧ’ⲁⲡⲟⲇⲓⲝⲓⲥ ⲉϣϫⲉ ⲥⲣ̅ⲥⲩⲙⲫⲱⲛⲉⲓ ⲙ̣[ⲛ̅] <text:line-break/><text:span text:style-name="T1"> </text:span><text:span text:style-name="T2">(50/31) </text:span> [ⲣ̅ⲣ]ⲱⲙⲉ ⲧⲏⲣⲟⲩ ⲉⲧⲃⲉ ⲡⲭⲁⲟⲥ ϫⲉ ⲟ̣[ⲩ]ⲕ̣ⲁⲕⲉ ⲡⲉ <text:line-break/><text:span text:style-name="T1"> </text:span><text:span text:style-name="T2">(50/32) </text:span> ⲟⲩⲉⲃⲟⲗ ⲇⲉ ⲡⲉ ϩⲛ̅ ⲟⲩϩⲁⲓ̈ⲃ̣[ⲉⲥ ⲁⲩⲙⲟⲩⲧⲉ ⲉⲣⲟϥ] <text:line-break/><text:span text:style-name="T1"> </text:span><text:span text:style-name="T2">(50/33) </text:span> ϫⲉ ⲕⲁⲕⲉ ⲑ{ϩ}ⲁⲓ̈ⲃⲉⲥ ⲇⲉ ⲟ[ⲩⲉⲓ ⲉⲃⲟⲗ ⲧⲉ ϩⲛ ⲟⲩⲉⲣ] <text:line-break/><text:span text:style-name="T1"> </text:span><text:span text:style-name="T2">(50/34) </text:span> [ⲧⲟ]ⲛ ⲉϥϣⲟⲟⲡ· ⟦ϩ⟧ϫⲓⲛ ⲡ̣[ϣⲟⲣⲡ·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5:53:08.302875200</meta:creation-date>
    <dc:date>2026-03-24T15:54:13.802590400</dc:date>
    <meta:editing-duration>PT1M5S</meta:editing-duration>
    <meta:editing-cycles>1</meta:editing-cycles>
    <meta:document-statistic meta:table-count="0" meta:image-count="0" meta:object-count="0" meta:page-count="13" meta:paragraph-count="4" meta:word-count="3796" meta:character-count="25288" meta:non-whitespace-character-count="19822"/>
    <meta:generator>LibreOffice/26.2.1.2$Windows_X86_64 LibreOffice_project/620$Build-2</meta:generator>
  </office:meta>
</office:document-meta>
</file>