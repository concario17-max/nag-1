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style:font-name="Antinoou"/>
    </style:style>
    <style:style style:name="P2" style:family="paragraph" style:parent-style-name="Text_20_body">
      <style:text-properties style:font-name="Antinoou"/>
    </style:style>
    <style:style style:name="P3" style:family="paragraph" style:parent-style-name="Standard">
      <style:paragraph-properties fo:break-before="page"/>
      <style:text-properties style:font-name="Antinoou"/>
    </style:style>
    <style:style style:name="P4" style:family="paragraph" style:parent-style-name="Standard">
      <style:paragraph-properties fo:break-before="page"/>
      <style:text-properties style:font-name="Antinoou" officeooo:paragraph-rsid="000b07de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fo:font-size="12pt" fo:font-weight="bold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 codex V ) Eugnostos the Blessed</text:p>
      <text:p text:style-name="P2"><text:span text:style-name="T1"> </text:span><text:span text:style-name="T2">(1/1) </text:span> [ⲉⲩⲅⲛⲟⲥⲧⲟⲥ ⲛ̅]ⲛⲓϣ[ⲏⲣⲉ...]ⲁ <text:line-break/><text:span text:style-name="T1"> </text:span><text:span text:style-name="T2">(1/2) </text:span> [ 8+- ] ⲙⲛ̅ ⲛ̅ϣ̣[..] ⲛ̣̅ⲧⲉ <text:line-break/><text:span text:style-name="T1"> </text:span><text:span text:style-name="T2">(1/3) </text:span> [ 7+- ].[·] ⲭⲁⲓⲣⲉ[·] ϯ̣ⲟⲩⲱϣ <text:line-break/><text:span text:style-name="T1"> </text:span><text:span text:style-name="T2">(1/4) </text:span> [ⲉⲧⲉⲧ]ⲛ̅ⲙ̣̅[ⲙⲉ] ϫⲉ ⲛ̅ⲣⲱⲙ̣[ⲉ] ⲧⲏⲣⲟⲩ ⲛ̅‐ <text:line-break/><text:span text:style-name="T1"> </text:span><text:span text:style-name="T2">(1/5) </text:span> [ϫⲡⲟ] ⲙ̣̅ⲡⲕ̣[ⲁ]ϩ ϫⲓⲛ ⲛ̅ⲧⲕⲁ[ⲧ]ⲁⲃⲟⲗⲏⲛ̅‐ <text:line-break/><text:span text:style-name="T1"> </text:span><text:span text:style-name="T2">(1/6) </text:span> [ⲧⲉ ⲡⲓ]ⲕ̣ⲟⲥⲙⲟⲥ ϣⲁ ϩⲟⲩⲛ ⲉ̣ϯⲛⲟⲩ ⲥⲉ‐ <text:line-break/><text:span text:style-name="T1"> </text:span><text:span text:style-name="T2">(1/7) </text:span> ϣ̣[ⲓⲛ]ⲉ ⲛ̅ⲥⲁ ⲡⲛⲟⲩⲧⲉ ϫⲉ ⲛⲓⲙ ⲡⲉ· <text:line-break/><text:span text:style-name="T1"> </text:span><text:span text:style-name="T2">(1/8) </text:span> ⲏ̅ [ⲟⲩ]ⲁ̣ϣ ⲙ̅ⲙⲓⲛⲉ ⲡⲉ· ⲁⲩ̣ⲱ ⲙ̅ⲡⲟⲩ‐ <text:line-break/><text:span text:style-name="T1"> </text:span><text:span text:style-name="T2">(1/9) </text:span> ϭⲛ̅ⲧ̣ϥ̅· ⲛⲉⲧ’ⲙⲉⲩⲉ ⲇⲉ ⲉⲃ̣ⲟ̣ⲗ̣ ⲛ̅ϩⲏ‐ <text:line-break/><text:span text:style-name="T1"> </text:span><text:span text:style-name="T2">(1/10) </text:span> ⲧⲟⲩ ϫⲉ ϩⲉⲛⲥⲁⲃⲉ ⲛⲉ ⲉⲃⲟⲗ ϩⲙ̅ ⲡⲓ‐ <text:line-break/><text:span text:style-name="T1"> </text:span><text:span text:style-name="T2">(1/11) </text:span> ⲣⲟ[ⲟ]ⲩ̣ϣ ⲛ̅ⲧⲉ ⲡⲓⲕⲟ̣[ⲥ]ⲙ[ⲟ]ⲥ· ⲛⲏ ⲉⲧⲉ <text:line-break/><text:span text:style-name="T1"> </text:span><text:span text:style-name="T2">(1/12) </text:span> ⲧⲙⲉ ϣⲟⲟⲡ’ ⲛ̅ϩⲏ̣ⲧ̣ⲟⲩ ⲁⲛ· ⲡⲓⲧⲉϩⲟ <text:line-break/><text:span text:style-name="T1"> </text:span><text:span text:style-name="T2">(1/13) </text:span> ⲅⲁⲣ ⲉⲣⲁⲧϥ̅ ⲛ̅ⲧⲉ ⲡ̣[ⲓ]ⲁ̣ⲓⲱⲛ ϣⲁⲩϫⲟⲟϥ <text:line-break/><text:span text:style-name="T1"> </text:span><text:span text:style-name="T2">(1/14) </text:span> ⲛ̅ϣⲟⲙⲛ̅ⲧ’ ⲛ̅ⲥⲙⲟⲧ’̣ ⲉⲃ[ⲟⲗ] {ϩ̅ⲓ}ⲧⲟ̣ⲟ̣ⲧ̣ⲟⲩ <text:line-break/><text:span text:style-name="T1"> </text:span><text:span text:style-name="T2">(1/15) </text:span> ⲉⲧⲃⲉ ⲡⲁⲓ̈ ⲛ̅ⲥⲉϯ ⲙⲉ̣ⲧⲉ̣ [ⲙⲛ̅] ⲛⲉ[ⲩ]‐ <text:line-break/><text:span text:style-name="T1"> </text:span><text:span text:style-name="T2">(1/16) </text:span> ⲉⲣⲏⲟⲩ ⲁⲛ· ⲁⲩ̣ⲟ̣[ 8+- ]ⲧ̣ⲟ <text:line-break/><text:span text:style-name="T1"> </text:span><text:span text:style-name="T2">(1/17) </text:span> .[..].̅.[ 9+- ].· ϩ̣ⲟ̣ⲓ̈ⲛⲉ <text:line-break/><text:span text:style-name="T1"> </text:span><text:span text:style-name="T2">(1/18) </text:span> ⲅⲁⲣ ⲉⲃ[ⲟⲗ ⲛ̅ϩⲏⲧⲟⲩ ⲥⲉϫⲱ ⲙ̅ⲙ]ⲟ̣ⲥ <text:line-break/><text:span text:style-name="T1"> </text:span><text:span text:style-name="T2">(1/19) </text:span> ϫ[ⲉ ⲟ]ⲩ̣ⲡ̅[ⲛ̅ⲁ̅ ⲡⲉ {ϩⲓ}ⲧⲟⲟⲧϥ] ⲟⲩⲁ[ⲁ]ϥ· <text:line-break/><text:span text:style-name="T1"> </text:span><text:span text:style-name="T2">(1/20) </text:span> ϩ̣[ⲛⲕ]ⲟ̣[ⲟⲩⲉ ϫⲉ ⲉⲧⲁ]ϥϣⲱⲡⲉ̣ [ϩ]ⲁ‐ <text:line-break/><text:span text:style-name="T1"> </text:span><text:span text:style-name="T2">(1/21) </text:span> [ⲧⲛ̅ ⲟⲩⲡⲣⲟⲛⲟⲓⲁ·] ϩ̣ⲛ̣ⲕⲟⲟⲩⲉ ϫ̣[ⲉ] <text:line-break/><text:span text:style-name="T1"> </text:span><text:span text:style-name="T2">(1/22) </text:span> [ⲉ̅ⲧⲁϥϣⲱⲡⲉ ϩⲁⲧⲛ̅ ⲟⲩ]{ϩ̅ⲓ}ⲙⲁⲣⲙⲉ̣‐ <text:line-break/><text:span text:style-name="T1"> </text:span><text:span text:style-name="T2">(1/23) </text:span> [ⲛⲏ· ⲁⲩⲱ ⲗⲁⲁⲩ ⲛ̅ⲛ]ⲁⲓ̈ ⲙ̅ⲡⲉϥϫ[ⲓ] <text:line-break/><text:span text:style-name="T1"> </text:span><text:span text:style-name="T2">(1/24) </text:span> [ⲉⲧⲙⲉ· 9+- ]ϣ̣[.]ⲡⲉ. <text:line-break/><text:span text:style-name="T1"> </text:span><text:span text:style-name="T2">(1/25) </text:span> [ 13+- ].ⲛ̅[..] <text:line-break/><text:span text:style-name="T1"> </text:span><text:span text:style-name="T2">(1/26) </text:span> (7+- lines lacking) <text:line-break/><text:span text:style-name="T1"> </text:span><text:span text:style-name="T2">(2/1) </text:span> ⲙ[ 7+- ]ⲉ ⲙ̅[ 12+- ] <text:line-break/><text:span text:style-name="T1"> </text:span><text:span text:style-name="T2">(2/2) </text:span> ⲡⲓ[. ⲡⲉ]ⲧⲉ ⲟⲩⲛ̣ [ϣϭⲟⲙ ϭⲉ ⲙ̅ⲙⲟϥ ⲉⲉⲓ] <text:line-break/><text:span text:style-name="T1"> </text:span><text:span text:style-name="T2">(2/3) </text:span> ⲉⲡ̣[ⲛ]ⲟ̣ⲩⲧⲉ ⲛ̅ⲧⲉ [ⲧⲙⲉ ⲉⲃⲟⲗ {ϩ̅ⲓ}ⲧⲛ̅] <text:line-break/><text:span text:style-name="T1"> </text:span><text:span text:style-name="T2">(2/4) </text:span> ⲕⲉⲥⲙⲏ̣ [ⲛ̅]ⲥⲁⲃⲟⲗ ⲛ̅ⲧ[ⲉⲓ̈ϣ]ⲟⲙ[ⲧⲉ ⲛ̅ⲥⲙⲏ] <text:line-break/><text:span text:style-name="T1"> </text:span><text:span text:style-name="T2">(2/5) </text:span> ⲉⲧⲁⲩϫⲟ̣[ⲟ]ⲩ̣· ϥⲛⲁⲣ̅ⲥⲩ̣ⲙ̣ⲫⲱ[ⲛⲓ ⲛ̅ⲟ]ⲩ̣‐ <text:line-break/><text:span text:style-name="T1"> </text:span><text:span text:style-name="T2">(2/6) </text:span> ⲟⲛ ⲛⲓⲙ ⲉⲧⲃⲏⲏⲧϥ̅· ⲁⲩⲱ ϥⲉ ⲛ̅[ⲛⲁⲧⲙⲟⲩ·] <text:line-break/><text:span text:style-name="T1"> </text:span><text:span text:style-name="T2">(2/7) </text:span> ⲉⲩⲁⲧⲙⲟⲩ ⲇⲉ ⲡⲉ ⲉϥϣⲟⲟⲡ’ [ϩⲛ̅ ⲧⲙ]ⲏ̣ⲧ̣[ⲉ ⲛ̅]‐ <text:line-break/><text:span text:style-name="T1"> </text:span><text:span text:style-name="T2">(2/8) </text:span> ϩⲉⲛⲣⲱⲙⲉ ⲉⲩⲙⲟⲟⲩⲧ’· ⲡⲏ̣ [ⲟⲩ]ⲛ ⲉⲧ’‐ <text:line-break/><text:span text:style-name="T1"> </text:span><text:span text:style-name="T2">(2/9) </text:span> ϣⲟⲟⲡ’ ⲛ̅ⲟⲩⲟⲉⲓϣ ⲛⲓⲙ· ⲉⲩⲁ[ⲧ’]ϣ̣ⲁϫⲉ <text:line-break/><text:span text:style-name="T1"> </text:span><text:span text:style-name="T2">(2/10) </text:span> ⲙ̅ⲙⲟϥ ⲡⲉ ⲙ̅ⲡⲟⲩⲥⲟⲩⲱⲛϥ̅ ⲛ̅ϭⲓ ϩⲉⲛⲁⲣⲭⲏ <text:line-break/><text:span text:style-name="T1"> </text:span><text:span text:style-name="T2">(2/11) </text:span> ⲙⲛ̅ ϩⲉⲛⲉⲝⲟⲩⲥⲓⲁ· ⲟⲩⲧⲉ ⲛⲏ ⲉⲧ’ⲧⲱ̣[ϣ·] <text:line-break/><text:span text:style-name="T1"> </text:span><text:span text:style-name="T2">(2/12) </text:span> ⲟⲩⲧⲉ [ⲫ]ⲩⲥ̣ⲓⲥ ⲛⲓⲙ· ⲉⲓⲙⲏ̣[ⲧⲓ ⲉϥⲉ]ⲓ̣ⲙ̣[ⲉ] <text:line-break/><text:span text:style-name="T1"> </text:span><text:span text:style-name="T2">(2/13) </text:span> ⲛⲁϥ ⲟⲩⲁⲁϥ· ⲡⲏ ⲅⲁⲣ ⲉⲧⲙ̅ⲙⲁ̣ⲩ ⲉⲙⲛ̣̅ <text:line-break/><text:span text:style-name="T1"> </text:span><text:span text:style-name="T2">(2/14) </text:span> ⲙⲛ̅ⲧ’ⲛⲟⲩⲧⲉ̣ [ⲉ]ϫⲱϥ· ⲟⲩϣⲁ ⲉⲛⲉϩ ⲡ[ⲉ·] <text:line-break/><text:span text:style-name="T1"> </text:span><text:span text:style-name="T2">(2/15) </text:span> ⲉⲩϣⲁ ⲉⲛⲉϩ ⲡ̣ⲉ̣[·] ⲙⲉϥϣⲱⲡ’ ⲉⲣⲟϥ ⲛ̅ⲟ̣[ⲩ]‐ <text:line-break/><text:span text:style-name="T1"> </text:span><text:span text:style-name="T2">(2/16) </text:span> ϫⲡⲟ· ⲉ̣[ⲩ]ⲁ̣ⲧ’ⲙⲓⲥⲓ ⲇⲉ ⲡⲉ〈ϥⲉ〉ⲛ̅ⲛⲁⲧ’ϯ [ⲉⲓⲛⲉ] <text:line-break/><text:span text:style-name="T1"> </text:span><text:span text:style-name="T2">(2/17) </text:span> ⲉⲣⲟ[ϥ· ⲉⲩⲁ]ⲧ’ϯ ⲉⲓⲛⲉ ⲇⲉ ⲉⲣⲟϥ ⲡⲉ· ⲙⲁ̣ϥ‐ <text:line-break/><text:span text:style-name="T1"> </text:span><text:span text:style-name="T2">(2/18) </text:span> ϣⲱⲡ’ ⲉ̣[ⲣⲟϥ ⲛ̅ⲟⲩⲙⲟ]ⲣ̣ⲫⲏ· [ⲡ]ⲏ̣ ⲅⲁⲣ <text:line-break/><text:span text:style-name="T1"> </text:span><text:span text:style-name="T2">(2/19) </text:span> ⲉⲧ’̣[ϣⲱⲡ’ ⲉⲣⲟϥ ⲛ̅ⲟⲩⲙⲟⲣⲫ]ⲏ ⲟⲩ[ⲥⲱⲛⲧ̅’] <text:line-break/><text:span text:style-name="T1"> </text:span><text:span text:style-name="T2">(2/20) </text:span> ⲛ̅ⲧ̣ⲉ ⲕⲉ̣[ⲟⲩⲁ ⲡⲉ·.....]ⲥ̣ⲙ[.]ⲉⲩ. <text:line-break/><text:span text:style-name="T1"> </text:span><text:span text:style-name="T2">(2/21) </text:span> [..]· ⲉⲛ.[ 14+- ]ⲩ̣ⲉ <text:line-break/><text:soft-page-break/><text:span text:style-name="T1"> </text:span><text:span text:style-name="T2">(2/22) </text:span> [ⲛ̅]ⲧ̣ⲟϥ ⲟⲩⲁⲁϥ [ⲟⲩⲛ̅ⲧⲁϥ ⲛ̅ⲟⲩⲥⲙⲟ]ⲧ <text:line-break/><text:span text:style-name="T1"> </text:span><text:span text:style-name="T2">(2/23) </text:span> [ⲉ]ϥⲉ ⲛ̅ⲛⲟϭ ⲉⲟ̣[ⲩⲟⲛ ⲛⲓⲙ ⲁⲩⲱ ⲉϥⲥⲁ]‐ <text:line-break/><text:span text:style-name="T1"> </text:span><text:span text:style-name="T2">(2/24) </text:span> [ⲧ]ⲡ̅’ ⲉⲟⲩⲟⲛ ⲛ[ⲓⲙ 12+- ] <text:line-break/><text:span text:style-name="T1"> </text:span><text:span text:style-name="T2">(2/25) </text:span> [..]ⲏ· ⲁⲩⲱ̣ [ 16+- ] <text:line-break/><text:span text:style-name="T1"> </text:span><text:span text:style-name="T2">(2/26) </text:span> [.]ⲧⲥ̅ ⲟ̣ⲩ̣ⲁ̣ⲧ’̣[ 17+- ⲁⲧ’]‐ <text:line-break/><text:span text:style-name="T1"> </text:span><text:span text:style-name="T2">(2/27) </text:span> ϯ ⲉⲓⲛ[ⲉ ⲉⲣⲟϥ 19+- ] <text:line-break/><text:span text:style-name="T1"> </text:span><text:span text:style-name="T2">(2/28) </text:span> (5+- lines lacking) <text:line-break/><text:span text:style-name="T1"> </text:span><text:span text:style-name="T2">(3/1) </text:span> [...ⲟⲩⲙⲁⲕⲁⲣⲓ]ⲟ̣ⲥ [ⲡⲉ· ⲉⲩⲁⲧⲛⲟ]ⲉⲓ ⲙ̅ⲙⲟϥ <text:line-break/><text:span text:style-name="T1"> </text:span><text:span text:style-name="T2">(3/2) </text:span> [ⲡⲉ· 9+- ]ⲉⲃⲟⲗ ⲙ̅[....] ⲉⲩⲁⲧⲙⲓⲥⲉ <text:line-break/><text:span text:style-name="T1"> </text:span><text:span text:style-name="T2">(3/3) </text:span> [ⲡⲉ· ⲉⲩⲁⲧ’ϣ]ⲁϫⲉ ⲉⲣⲟ[ϥ ⲡⲉ·] ϣⲁⲩⲙⲟⲩⲧⲉ <text:line-break/><text:span text:style-name="T1"> </text:span><text:span text:style-name="T2">(3/4) </text:span> [ⲉⲣⲟϥ ϫⲉ ⲡⲓ]ⲱⲧ’ ⲙ̅ⲡⲧ[ⲏⲣ]ϥ̣̅· ϩⲁⲑⲏ ⲇⲉ <text:line-break/><text:span text:style-name="T1"> </text:span><text:span text:style-name="T2">(3/5) </text:span> [ⲙ̅ⲡⲁⲧⲉⲗ]ⲁ̣ⲁⲩ ⲟⲩⲱⲛ̣ϩ̅ ⲉⲃⲟⲗ ⲛ̅ⲧⲉ <text:line-break/><text:span text:style-name="T1"> </text:span><text:span text:style-name="T2">(3/6) </text:span> [ⲛⲏ ⲉⲧⲟⲩ]ⲟⲛϩ̅· ϩⲉⲛⲙⲛ̅ⲧⲛⲟϭ ⲙⲛ̅ ϩⲉⲛ‐ <text:line-break/><text:span text:style-name="T1"> </text:span><text:span text:style-name="T2">(3/7) </text:span> [ⲉⲝⲟ]ⲩⲥⲓⲁ· ⲡⲏ ⲇⲉ ⲉⲧ’ϣⲟⲟⲡ’ ⲛ̅ϩⲏⲧϥ̅ <text:line-break/><text:span text:style-name="T1"> </text:span><text:span text:style-name="T2">(3/8) </text:span> ⲉ̣[ϥϭ]ⲱ̣ ⲉϥⲁⲙⲁϩⲧⲉ ⲙ̅ⲡⲧⲏⲣϥ̅ ⲛ̅ⲧⲉⲩ <text:line-break/><text:span text:style-name="T1"> </text:span><text:span text:style-name="T2">(3/9) </text:span> [ⲧ]ⲏ̣ⲣ̣ⲟ̣ⲩ· ⲉⲛⲥⲉⲁⲙⲁϩⲧⲉ ⲇⲉ ⲛ̅ⲧⲟϥ ⲙ̅ⲙⲟϥ <text:line-break/><text:span text:style-name="T1"> </text:span><text:span text:style-name="T2">(3/10) </text:span> ⲁⲛ ⲉⲃⲟⲗ {ϩ̅ⲓ}ⲧⲛ̅ ⲗⲁⲁⲩ· ⲡⲁⲓ̈ ⲟⲩⲛⲟⲩⲥ <text:line-break/><text:span text:style-name="T1"> </text:span><text:span text:style-name="T2">(3/11) </text:span> ⲡ[ⲉ ⲙ]ⲛ̣̅ ⲟⲩⲉⲛⲛⲟⲓⲁ [·] ⲟ̣ⲩ[ⲙ]ⲉⲉⲩⲉ ⲇⲉ <text:line-break/><text:span text:style-name="T1"> </text:span><text:span text:style-name="T2">(3/12) </text:span> ⲙ[ⲛ̅ ⲟ]ⲩ̣ⲥⲃⲱ ⲙⲛ̅ ⲟⲩϣⲟϫⲛⲉ· ⲙⲛ̅ ⲡⲏ <text:line-break/><text:span text:style-name="T1"> </text:span><text:span text:style-name="T2">(3/13) </text:span> ⲉⲧ’{ϩ̅ⲓ}ϫⲛ̅ ⲟⲩϣⲟϫ̣ⲛⲉ ⲙⲛ̅ ⲟⲩϭⲟ̣ⲙ ⲡⲁ <text:line-break/><text:span text:style-name="T1"> </text:span><text:span text:style-name="T2">(3/14) </text:span> ⲛⲓϭⲟⲙ ⲧⲏⲣⲟⲩ ϩⲱⲥ ⲉ̣ϥ̣[ϣ]ⲟ̣ⲟⲡ’ ⲛ̅ⲛⲟⲩ‐ <text:line-break/><text:span text:style-name="T1"> </text:span><text:span text:style-name="T2">(3/15) </text:span> ⲡⲏⲅⲏ ⲛ̅ⲧⲉⲩ ⲧⲏⲣⲟⲩ· ⲡ̣[ⲏ] ⲅ̣ⲁ̣ⲣ̣ ⲧⲏ̣ⲣϥ̅ <text:line-break/><text:span text:style-name="T1"> </text:span><text:span text:style-name="T2">(3/16) </text:span> ⲉⲧⲉ ϣⲁϥϣⲱⲡⲉ ⲉⲃ[ⲟⲗ ϩⲙ̅ ⲡ]ⲧⲁⲕⲟ· <text:line-break/><text:span text:style-name="T1"> </text:span><text:span text:style-name="T2">(3/17) </text:span> ϥⲛⲁⲣ̅ ⲁⲧ’ϣⲱⲡⲉ· [ⲡⲏ ⲉⲧ’ⲉⲃⲟⲗ] ϩⲛ̅ ϯ‐ <text:line-break/><text:span text:style-name="T1"> </text:span><text:span text:style-name="T2">(3/18) </text:span> [ⲁⲫ]ⲑⲁⲣ[ⲥⲓⲁ· ϥⲛⲁ]ⲣ̅ ⲁ[ⲧ’ϣⲱⲡⲉ ⲁⲛ·] ⲁ̣ⲗⲗⲁ <text:line-break/><text:span text:style-name="T1"> </text:span><text:span text:style-name="T2">(3/19) </text:span> ϥⲛⲁⲣ̅ ϩⲟⲩ̣[ⲉ ⲁⲫⲑⲁⲣⲧⲟⲛ· ϩⲱⲥ ⲟ]ⲩⲉⲃⲟⲗ <text:line-break/><text:span text:style-name="T1"> </text:span><text:span text:style-name="T2">(3/20) </text:span> ϩⲛ̅ ϯⲁ̣ⲫⲑ̣ⲁ̣[ⲣⲥⲓⲁ 6+-]ⲡⲉ· <text:line-break/><text:span text:style-name="T1"> </text:span><text:span text:style-name="T2">(3/21) </text:span> ϥ̣[ 12+- ]ⲱⲛ [ⲟⲩⲙⲏ]ⲏ̣ϣⲉ <text:line-break/><text:span text:style-name="T1"> </text:span><text:span text:style-name="T2">(3/22) </text:span> [ⲅⲁⲣ ⲛ̅ⲧⲉ ⲛ]ⲓ̣ⲣⲱⲙⲉ ⲁⲩⲥⲱ̣[ⲣⲙ̅· ⲉⲛⲥ]ⲉ‐ <text:line-break/><text:span text:style-name="T1"> </text:span><text:span text:style-name="T2">(3/23) </text:span> [ⲥⲟⲟⲩⲛ] ⲁ̣ⲛ ⲛ̣̅ϯ̣ⲇ̣ⲓⲁⲫⲟⲣⲁ [ⲉⲧⲉ ⲧⲁⲓ̈ ⲧ]ⲉ· <text:line-break/><text:span text:style-name="T1"> </text:span><text:span text:style-name="T2">(3/24) </text:span> [ⲛ̅ⲑⲉ ⲛ̅ⲛⲏ ⲉ]ⲧ’ϩⲉⲧ[ⲃ̅] ⲣ̣ⲱ̣[ⲙⲉ· ⲁⲩⲙⲟⲩ·] <text:line-break/><text:span text:style-name="T1"> </text:span><text:span text:style-name="T2">(3/25) </text:span> [ⲁⲩⲱ ϩⲱ] ϣ̣ⲁ ⲡⲉ[ⲓ̈ⲙ]ⲁ· ⲉ[ⲧⲃⲉ ⲡⲓ]‐ <text:line-break/><text:span text:style-name="T1"> </text:span><text:span text:style-name="T2">(3/26) </text:span> [ⲁⲫⲑⲁⲣⲧⲟⲥ] ⲛ̣̅ⲛ̣ⲟⲩⲧ̣ⲉ ϩⲛ̣̅ [ 7+- ] <text:line-break/><text:span text:style-name="T1"> </text:span><text:span text:style-name="T2">(3/27) </text:span> [.....].ⲟ[.] ⲛ̣̅ⲧⲉ ⲧ̣[ 10+- ] <text:line-break/><text:span text:style-name="T1"> </text:span><text:span text:style-name="T2">(3/28) </text:span> [.....]ⲟ̣ⲥ ⲛ.[.] ϯⲙ̣[ 11+- ] <text:line-break/><text:span text:style-name="T1"> </text:span><text:span text:style-name="T2">(3/29) </text:span> [ 7+- ]ⲉϥ̣[ⲟ]ⲩ̣ⲱϣ [ⲉ]ⲛ[ⲁϩⲧⲉ ⲉⲛⲓ]‐ <text:line-break/><text:span text:style-name="T1"> </text:span><text:span text:style-name="T2">(3/30) </text:span> [ϣⲁϫⲉ ⲉⲧ’ⲕⲏ] ⲉϩⲣⲁⲓ̈ ⲛ̣̅[ 8+- ] <text:line-break/><text:span text:style-name="T1"> </text:span><text:span text:style-name="T2">(3/31) </text:span> [ 8+- ]ⲉ ⲙⲁ[ⲣⲉϥⲃⲱⲕ ⲉⲃⲟⲗ] <text:line-break/><text:span text:style-name="T1"> </text:span><text:span text:style-name="T2">(4/1) </text:span> {ϩ̅[̅ⲓ}ⲧⲛ̅ ⲛⲓⲁⲧ]ϫ̣ⲓ ⲏ[ⲡⲉ ⲉⲣⲟⲟⲩ ⲉⲧ’ϩⲏⲡ’] <text:line-break/><text:span text:style-name="T1"> </text:span><text:span text:style-name="T2">(4/2) </text:span> ⲉⲧ̣[ⲙ̅ⲙⲁⲩ· ⲙ]ⲁ̣ⲣⲉϥ[ⲙⲟⲩϣⲧ̅’ ⲇⲉ ϣⲁ ⲡⲓϫⲱⲕ] <text:line-break/><text:span text:style-name="T1"> </text:span><text:span text:style-name="T2">(4/3) </text:span> ⲛ̅ⲛⲏ ⲉ̣[ⲧ’ⲟⲩ]ⲟⲛϩ̅ ⲁⲩⲱ̣ [ϥⲛⲁϭⲓⲛⲉ ⲛ̅ⲛⲓⲁⲧ]‐ <text:line-break/><text:span text:style-name="T1"> </text:span><text:span text:style-name="T2">(4/4) </text:span> ⲟⲩⲱⲛ̣ϩ̣̅ [ϩⲣ]ⲁ̣ⲓ̈ ϩⲛ̅ ⲛⲉⲧ’ⲟ̣[ⲩⲟⲛϩ̅· ϯⲉⲛ]‐ <text:line-break/><text:span text:style-name="T1"> </text:span><text:span text:style-name="T2">(4/5) </text:span> ⲛⲟⲓⲁ ⲅⲁⲣ ⲉ̣[ⲥⲛⲁ]ⲧⲁⲙⲟⲟⲩ [· ϯⲡⲓⲥⲧⲓⲥ] <text:line-break/><text:span text:style-name="T1"> </text:span><text:span text:style-name="T2">(4/6) </text:span> ⲅⲁⲣ ⲛ̅ⲧⲉⲛⲡⲉ ⲧⲉ ⲛⲏ ⲉⲧⲉ̣ ⲛ̅ⲥⲉ̣[ⲟⲩⲟⲛϩ̅] <text:line-break/><text:span text:style-name="T1"> </text:span><text:span text:style-name="T2">(4/7) </text:span> ⲁⲛ ⲛⲉ ⲛⲏ ⲉⲧⲟⲩⲟⲛϩ̅· ⲧⲁⲓ̈ ⲇⲉ [ⲧⲉ ⲟⲩⲁⲣⲭⲏ] <text:line-break/><text:span text:style-name="T1"> </text:span><text:span text:style-name="T2">(4/8) </text:span> ⲛ̅ϯⲅⲛⲱⲥⲓⲥ· ⲡϫⲟⲉⲓⲥ ⲛ̅ⲧⲉ ⲡ̣[ⲧⲏⲣ]ϥ̣̅ <text:line-break/><text:span text:style-name="T1"> </text:span><text:span text:style-name="T2">(4/9) </text:span> ⲛ̅ⲛⲉϣⲁⲩϯ ⲣⲁⲛ ⲉⲣⲟϥ ⲁⲛ ⲕⲁ[ⲧⲁ ⲧ]ⲙ̣ⲛ̅‐ <text:line-break/><text:soft-page-break/><text:span text:style-name="T1"> </text:span><text:span text:style-name="T2">(4/10) </text:span> ⲧⲙⲉ ϫⲉ ⲡⲓⲱⲧ’· ⲁⲗⲗⲁ ⲡⲓϣⲟⲣⲡ̅’ ⲛ̣̅ⲉⲓⲱⲧ’ <text:line-break/><text:span text:style-name="T1"> </text:span><text:span text:style-name="T2">(4/11) </text:span> ⲡⲓⲱⲧ’ ⲅⲁⲣ ⲟⲩⲁⲣⲭⲏ ⲡⲉ ⲛ̅ⲧⲉ ⲛⲏ ⲉⲧⲛⲏⲟⲩ <text:line-break/><text:span text:style-name="T1"> </text:span><text:span text:style-name="T2">(4/12) </text:span> ⲉⲃⲟⲗ̓ ⲉⲃⲟ[ⲗ] {ϩ̅ⲓ}ⲧⲟⲟⲧϥ̅· ⲡⲓⲁⲧⲁⲣⲭ̣[ⲏ] ⲇⲉ <text:line-break/><text:span text:style-name="T1"> </text:span><text:span text:style-name="T2">(4/13) </text:span> ⲛ̅ⲛⲁⲧⲣ̅ ϩⲁ[ⲉ] ⲉϥϣⲟⲟⲡ’ ⲛ̣̅ⲛⲟⲩϣ̣[ⲟⲣ]ⲡ̅’ ⲛ̅ⲉⲓ̣‐ <text:line-break/><text:span text:style-name="T1"> </text:span><text:span text:style-name="T2">(4/14) </text:span> ⲱⲧ’· {ϩ̅ⲓ}ⲛⲁ ϫⲉ ⲉⲛⲉⲟⲩⲱϣ ⲉⲣ̅ ϩⲙⲟⲧ’ <text:line-break/><text:span text:style-name="T1"> </text:span><text:span text:style-name="T2">(4/15) </text:span> ⲛⲁϥ ⲛ̅ⲛⲟⲩⲣⲁⲛ· ⲟⲩ ⲅⲁⲣ ⲛ̅ⲧⲛ̅ⲥⲟⲟⲩⲛ ⲁⲛ <text:line-break/><text:span text:style-name="T1"> </text:span><text:span text:style-name="T2">(4/16) </text:span> ϫⲉ ⲟⲩ ⲡ[ⲉ]· ⲛ̅ⲟⲩⲟⲉⲓϣ ⲇⲉ ⲛⲓⲙ ⲉϥⲉⲓⲙⲉ <text:line-break/><text:span text:style-name="T1"> </text:span><text:span text:style-name="T2">(4/17) </text:span> ⲉⲣⲟϥ ⲛ̅ϩ̣ⲏ̣ⲧϥ̅ ⲛ̅ⲑⲉ ⲛ̅ϩⲣⲁⲓ̈ ϩⲛ̅ ⲟⲩⲉⲓⲇⲉⲁ <text:line-break/><text:span text:style-name="T1"> </text:span><text:span text:style-name="T2">(4/18) </text:span> ⲉⲥⲟⲩ̣[ⲱⲛ]ϩ̣̅ ⲉⲃⲟⲗ̣ ⲉⲥⲉⲓⲛⲉ ⲙ̅ⲙⲟϥ· ⲛ̅ⲧⲟϥ <text:line-break/><text:span text:style-name="T1"> </text:span><text:span text:style-name="T2">(4/19) </text:span> ⲇⲉ ⲡⲉ̣ [ⲡⲓⲥⲙⲟ]ⲧ’̣ ⲛ̅ⲧ[ⲉ]ϥ̣ [ⲉⲧ]ⲁⲩϯ [ⲣ]ⲁ̣[ⲛ] <text:line-break/><text:span text:style-name="T1"> </text:span><text:span text:style-name="T2">(4/20) </text:span> ⲉⲣⲟϥ ϫ̣[ⲉ ⲡⲓⲱⲧ’ ⲛ̅]ⲣⲉ̣[ϥϫⲡⲟ]ϥ ⲟⲩⲁⲁϥ <text:line-break/><text:span text:style-name="T1"> </text:span><text:span text:style-name="T2">(4/21) </text:span> ⲡⲓⲣ[ⲉϥⲙ̅ⲧⲟ ⲙ̅ⲡⲉϥϩⲟ·] ⲉⲡⲓⲇⲏ ϩⲙ̅ <text:line-break/><text:span text:style-name="T1"> </text:span><text:span text:style-name="T2">(4/22) </text:span> ⲡⲓⲥ̣[ⲙⲟⲧ’] ⲛ̅[ⲧⲉϥ ⲉⲁϥⲟⲩⲱⲛ]ϩ̣̅ ⲉ̣[ⲃⲟⲗ] ⲛ̅‐ <text:line-break/><text:span text:style-name="T1"> </text:span><text:span text:style-name="T2">(4/23) </text:span> ϣⲟ̣[ⲣⲡ̅ ⲙ̅]ⲡⲓⲁ[ⲧ’]ϫ̣ⲡⲟϥ· [ⲙ̅ⲡⲉϥϣⲱϣ ⲇⲉ] <text:line-break/><text:span text:style-name="T1"> </text:span><text:span text:style-name="T2">(4/24) </text:span> ⲛ̣̅[ⲭⲣⲟ]ⲛ̣ⲟⲥ ⲙⲛ̅ ⲡⲏ ⲉⲧⲣ̅ ϣ̣[ⲟⲣⲡ̅’ ⲉⲣⲟϥ ⲛ̅]‐ <text:line-break/><text:span text:style-name="T1"> </text:span><text:span text:style-name="T2">(4/25) </text:span> ⲟ[ⲩⲟⲉⲓⲛ·] ⲉ̣ϥⲙ̅ⲙⲉ ⲉⲣⲟϥ ⲁⲛ [ⲛ̅ϣⲟⲣⲡ̅’· ⲁⲗⲗⲁ] <text:line-break/><text:span text:style-name="T1"> </text:span><text:span text:style-name="T2">(4/26) </text:span> [ⲛⲉⲙⲛ̅ ⲟⲩⲟ]ⲉⲓϣ ⲉϥⲉ ⲛ̅ⲛⲁ[ⲧ’ϣⲱⲡⲉ· ⲉϥ]‐ <text:line-break/><text:span text:style-name="T1"> </text:span><text:span text:style-name="T2">(4/27) </text:span> [ⲛ̅ϩⲏⲧϥ ⲛ̅ⲟ]ⲩ̣ⲟⲉⲓϣ ⲛⲓⲙ· [ⲁⲩⲱ ϣⲁⲣⲉϩⲟⲓ̈]‐ <text:line-break/><text:span text:style-name="T1"> </text:span><text:span text:style-name="T2">(4/28) </text:span> [ⲛⲉ ⲙⲉⲉ]ⲩ̣ⲉ ϫⲉ ⲉϥϣⲏ[ϣ ⲟ]ⲩ̣[ⲃⲏϥ ⲁⲛ ϩⲛ̅] <text:line-break/><text:span text:style-name="T1"> </text:span><text:span text:style-name="T2">(4/29) </text:span> [ⲧϭⲟⲙ· ⲙⲛ̅ⲛⲥ]ⲱϥ ⲁϥⲟⲩⲱⲛ[ϩ̅ ⲉⲃⲟⲗ] <text:line-break/><text:span text:style-name="T1"> </text:span><text:span text:style-name="T2">(4/30) </text:span> [ 7+- ]· ⲛⲏ ⲉ[ⲧ’]ⲛ̅ⲛⲁ.[5+-] <text:line-break/><text:span text:style-name="T1"> </text:span><text:span text:style-name="T2">(4/31) </text:span> [...ⲙⲛ̅]ⲛ̣ⲥ̣ⲁ ⲇ̣ⲉ ϩⲛ̅ⲛ ⲟ̣[ 8+- ] <text:line-break/><text:span text:style-name="T1"> </text:span><text:span text:style-name="T2">(4/32) </text:span> [.....ⲛ̅ⲁ]ⲩ̣ⲧⲟⲅⲉⲛⲏ[ⲥ 10+- ] <text:line-break/><text:span text:style-name="T1"> </text:span><text:span text:style-name="T2">(5/1) </text:span> [ 8+- ]ⲩ̣ⲱ̣[ 9+- ]ⲛ̅ <text:line-break/><text:span text:style-name="T1"> </text:span><text:span text:style-name="T2">(5/2) </text:span> [ 7+- ϩⲛ̅]ⲛ ⲉⲟ[ⲟⲩ ⲛ̅ⲛ]ⲁ̣ⲧ’ϯ ⲏⲡⲉ <text:line-break/><text:span text:style-name="T1"> </text:span><text:span text:style-name="T2">(5/3) </text:span> [ⲉⲣⲟⲟⲩ· ⲛⲏ] ⲉⲧⲉ ϣⲁⲩ̣[ϯ ⲣⲁⲛ] ⲉⲣⲟⲟⲩ· <text:line-break/><text:span text:style-name="T1"> </text:span><text:span text:style-name="T2">(5/4) </text:span> [ϫⲉ ϯⲅⲉⲛⲉ]ⲁ̣· ⲛ̅ⲛⲁⲧⲣ̅ ⲣ̣̅[ⲣⲟ] ⲉϩⲣⲁⲓ̈ ⲉϫⲱⲥ <text:line-break/><text:span text:style-name="T1"> </text:span><text:span text:style-name="T2">(5/5) </text:span> [ⲛ̅ϩⲣⲁⲓ̈ ϩⲛ̅ ⲛⲓⲙ] ⲛ̅ⲧⲣ̅ⲣⲱ[ⲟⲩ] ⲉⲧ’ⲕⲏ ⲉϩⲣⲁⲓ̈· <text:line-break/><text:span text:style-name="T1"> </text:span><text:span text:style-name="T2">(5/6) </text:span> [ⲡⲓⲁⲧⲟ] ⲇ[ⲉ ⲧ]ⲏⲣϥ̅ ⲛ̅ⲧⲉ ⲛⲓⲁⲧⲣ̅ ⲣ̅ⲣⲟ ⲉϩⲣⲁⲓ̈ <text:line-break/><text:span text:style-name="T1"> </text:span><text:span text:style-name="T2">(5/7) </text:span> [ⲉϫⲱ]ⲟⲩ· ϣⲁⲩϯ ⲣⲁⲛ ⲉⲣⲟⲟⲩ ϫⲉ ⲛ̅‐ <text:line-break/><text:span text:style-name="T1"> </text:span><text:span text:style-name="T2">(5/8) </text:span> [ϣⲏⲣ]ⲉ ⲛ̅ⲧⲉ ⲡⲓⲁⲧⲙⲓⲥⲉ ⲙⲛ̅ ⲡⲓⲡⲣ̅ⲣⲉ <text:line-break/><text:span text:style-name="T1"> </text:span><text:span text:style-name="T2">(5/9) </text:span> [ⲉⲃ]ⲟ̣ⲗ ⲙ̅ⲙⲟϥ ⲟⲩⲁⲁϥ· ⲡⲓⲁⲧ’ⲥⲟⲩⲱⲛϥ̅ <text:line-break/><text:span text:style-name="T1"> </text:span><text:span text:style-name="T2">(5/10) </text:span> ⲇⲉ ⲉϥⲙⲉϩ̣ ⲉⲃⲟⲗ ϩⲛ̅ⲛ ⲉⲟⲟⲩ ⲛⲓⲙ ⲛ̅ⲁⲧ’‐ <text:line-break/><text:span text:style-name="T1"> </text:span><text:span text:style-name="T2">(5/11) </text:span> ⲧⲁ̣ⲕ̣ⲟ̣ ⲙⲛ̅ ⲟⲩⲣⲉϣⲉ ⲛ̅ⲛⲁⲧ’ϣⲁϫⲉ <text:line-break/><text:span text:style-name="T1"> </text:span><text:span text:style-name="T2">(5/12) </text:span> ⲉ̣[ⲣⲟ]ϥ̣· ⲉ[ⲧ]ⲃⲉ ⲡⲁⲓ̈ ⲛⲉϥⲕⲉϣⲏⲣⲉ <text:line-break/><text:span text:style-name="T1"> </text:span><text:span text:style-name="T2">(5/13) </text:span> ⲧⲏⲣⲟⲩ ⲟⲩⲛ̅ⲧⲁⲩ ⲙ̅ⲡⲓⲙ̅ⲧⲟⲛ ϩⲣⲁⲓ̈ <text:line-break/><text:span text:style-name="T1"> </text:span><text:span text:style-name="T2">(5/14) </text:span> ⲛ̅ϩⲏⲧϥ̅· ⲉⲩⲣⲁϣⲉ ⲉⲩⲙⲏⲛ ϩⲙ̅ <text:line-break/><text:span text:style-name="T1"> </text:span><text:span text:style-name="T2">(5/15) </text:span> ⲡⲉⲩⲉⲟⲟⲩ· ⲛ̅ⲛⲁⲧ’ϣⲓⲃⲉ ⲙⲛ̅ ⲡⲓⲧⲉ‐ <text:line-break/><text:span text:style-name="T1"> </text:span><text:span text:style-name="T2">(5/16) </text:span> ⲗⲏⲗ ⲛ̅ⲛⲁⲧ’ϯ ϣⲓ ⲉⲣⲟϥ· ⲡⲏ ⲉⲧⲉ ⲙ̅‐ <text:line-break/><text:span text:style-name="T1"> </text:span><text:span text:style-name="T2">(5/17) </text:span> ⲡⲟⲩⲥⲱⲧⲉⲙ ⲉⲣⲟϥ ⲉⲛ̣ⲉϩ· ⲟⲩⲧⲉ ⲙ̅‐ <text:line-break/><text:span text:style-name="T1"> </text:span><text:span text:style-name="T2">(5/18) </text:span> [ⲡⲟ]ⲩⲥⲟⲩ̣ⲱⲛϥ̅ ϩⲣⲁⲓ̈ ϩ〈ⲛ̅〉 {ⲡ}ⲕⲟⲥⲙⲟⲥ <text:line-break/><text:span text:style-name="T1"> </text:span><text:span text:style-name="T2">(5/19) </text:span> ⲛⲓⲙ ⲛ̅ⲧⲁⲩ ⲙⲛ̅ ⲛⲉⲩⲁⲓⲱⲛ [· ⲉ]ⲃⲟⲗ <text:line-break/><text:span text:style-name="T1"> </text:span><text:span text:style-name="T2">(5/20) </text:span> ⲇⲉ ϩⲙ̅ ⲡⲉⲓ̈ⲡⲓⲣⲉ ⲉⲃⲟ[ⲗ] ⲙ̣̅ⲙⲟϥ ⲟⲩⲁⲁϥ <text:line-break/><text:span text:style-name="T1"> </text:span><text:span text:style-name="T2">(5/21) </text:span> ⲁ[ⲥⲡ]ⲣ̅ⲣⲉ ⲉⲃⲟⲗ ⲛ̅ϭⲓ ⲕⲉⲁⲣⲭⲏ ⲉⲃⲟⲗ <text:line-break/><text:span text:style-name="T1"> </text:span><text:span text:style-name="T2">(5/22) </text:span> [ⲙ̅ⲡⲉϥϫ]ⲡ̣ⲟ ⲟⲩ̣ⲁⲁϥ ⲙ̅ⲙⲟⲛⲟⲅⲉⲛⲏⲥ̣ <text:line-break/><text:span text:style-name="T1"> </text:span><text:span text:style-name="T2">(5/23) </text:span> [ⲛ̅ϣⲁϫⲉ] ⲡⲁ̣ⲛⲧⲱⲥ· ⲡⲏ ⲅⲁ[ⲣ ⲉⲧⲁϥ]‐ <text:line-break/><text:span text:style-name="T1"> </text:span><text:span text:style-name="T2">(5/24) </text:span> ⲟ̣[ⲩⲱⲛϩ̅] ⲉⲃ̣ⲟⲗ ϩⲁⲑⲏ ⲙ̅ⲡⲧⲏⲣϥ̣̅ <text:line-break/><text:soft-page-break/><text:span text:style-name="T1"> </text:span><text:span text:style-name="T2">(5/25) </text:span> ϩⲙ̣̅ [ⲡⲓⲉⲱⲛ ⲛ̅ⲛ]ⲁⲧⲛ̅ⲁⲣⲏϫϥ̅ ⲡⲓⲱⲧ’ [ⲉⲧ’]‐ <text:line-break/><text:span text:style-name="T1"> </text:span><text:span text:style-name="T2">(5/26) </text:span> ϯ[ⲟⲩⲱ ⲉⲃⲟⲗ] ⲙ̅ⲙⲟϥ ⲟⲩⲁⲁ̣ϥ· ⲉⲧ̣[ⲉ] <text:line-break/><text:span text:style-name="T1"> </text:span><text:span text:style-name="T2">(5/27) </text:span> [ⲛ̅]ⲁ̣ⲣⲭⲏ[·] ⲡ[ⲏ] ⲉⲧⲉ ⲡϣⲁ[ϫ]ⲉ ϣⲟ[ⲟⲡ’] <text:line-break/><text:span text:style-name="T1"> </text:span><text:span text:style-name="T2">(5/28) </text:span> [ⲛ̅ϩⲏⲧ]ϥ̣̅· ⲉϥⲙⲉϩ ⲉⲃⲟⲗ ⲛ̅ⲟⲩⲟⲉ̣[ⲓⲛ] <text:line-break/><text:span text:style-name="T1"> </text:span><text:span text:style-name="T2">(5/29) </text:span> [ⲉϥⲣ̅ ⲟⲩ]ⲟ̣ⲉⲓⲛ ⲛ̅[ⲛ]ⲁⲧ’[ϣⲁ]ϫ[ⲉ ⲉⲣⲟϥ·] <text:line-break/><text:span text:style-name="T1"> </text:span><text:span text:style-name="T2">(5/30) </text:span> [ⲛ̅ⲧⲁⲣⲭⲏ] ⲇ̣ⲉ ⲉϥⲙⲉⲉ̣[ⲩⲉ ⲉⲧⲣⲉ]‐ <text:line-break/><text:span text:style-name="T1"> </text:span><text:span text:style-name="T2">(5/31) </text:span> [ⲡⲉϥⲉⲓⲛ]ⲉ ϣⲱⲡ[ⲉ ⲛ̅ⲟⲩⲛⲟϭ ⲛ̅ϭⲟⲙ ⲛ̅]‐ <text:line-break/><text:span text:style-name="T1"> </text:span><text:span text:style-name="T2">(6/1) </text:span> ⲟ[ⲩⲟⲉⲓⲛ ⲉϥⲣ̅] ⲟⲩ̣[ⲟⲉⲓⲛ 9+- ] <text:line-break/><text:span text:style-name="T1"> </text:span><text:span text:style-name="T2">(6/2) </text:span> ⲛ̅ⲧ̣ⲟ̣ⲩ̣[ⲛⲟⲩ ⲡⲓⲣ]ⲱⲙ[ⲉ ⲉⲧⲉ ⲟⲩⲁⲣⲭⲏ ⲡⲉ] <text:line-break/><text:span text:style-name="T1"> </text:span><text:span text:style-name="T2">(6/3) </text:span> ⲛ̅ⲧⲉ [ⲡⲟⲩⲟ]ⲉⲓⲛ ⲉⲧⲙ̣̅ⲙ̣ⲁ̣[ⲩ ⲁϥⲟⲩⲱⲛϩ̅ ⲙ̅]‐ <text:line-break/><text:span text:style-name="T1"> </text:span><text:span text:style-name="T2">(6/4) </text:span> ⲡⲓⲉⲱⲛ ⲛ̣̅[ϩⲟ]ⲟ̣ⲩⲧ’ⲥ{ϩ̅ⲓ}ⲙ[ⲉ ⲛ̅ⲛⲁⲧⲙⲟⲩ· ϯ]‐ <text:line-break/><text:span text:style-name="T1"> </text:span><text:span text:style-name="T2">(6/5) </text:span> ⲙⲛ̅ⲧ’ϩⲟⲟ[ⲩⲧ’] ⲙⲉⲛ ϣ[ⲁⲩϯ ⲣⲁⲛ ⲉⲣⲟⲥ] <text:line-break/><text:span text:style-name="T1"> </text:span><text:span text:style-name="T2">(6/6) </text:span> ϫⲉ →ⲡ̅←ⲛⲟⲩⲥ ⲛ̅ⲣⲉϥϫⲡ̣ⲟ̣ [ⲉ]ⲧ̣ϫⲱ̣[ⲕ ⲉⲃⲟⲗ] <text:line-break/><text:span text:style-name="T1"> </text:span><text:span text:style-name="T2">(6/7) </text:span> ⲙ̅ⲙⲟϥ ⲟⲩⲁⲁϥ· ⲧⲉϥⲙⲛ̅ⲧ’ⲥ{ϩ̅ⲓ}[ⲙⲉ ⲇⲉ ϫⲉ] <text:line-break/><text:span text:style-name="T1"> </text:span><text:span text:style-name="T2">(6/8) </text:span> ϯⲉⲛⲛⲟⲓⲁ ⲧⲁ ⲛⲓⲥⲟⲫⲓⲁ̣ ⲧ̣ⲏⲣⲟⲩ [ϯⲣⲉϥ]‐ <text:line-break/><text:span text:style-name="T1"> </text:span><text:span text:style-name="T2">(6/9) </text:span> ϫⲡⲟ ⲛ̅ⲧⲉ ⲛⲓⲥⲟⲫⲓⲁ· ϣⲁⲩϯ ⲣⲁ̣[ⲛ ⲉ]ⲣ̣[ⲟⲥ] <text:line-break/><text:span text:style-name="T1"> </text:span><text:span text:style-name="T2">(6/10) </text:span> ϫⲉ ⲧⲙⲉ· ⲉⲡⲓⲇⲏ ⲥⲉϣⲏϣ ϩⲛ̅ ⲧϭⲁⲙ <text:line-break/><text:span text:style-name="T1"> </text:span><text:span text:style-name="T2">(6/11) </text:span> ⲙⲛ̅ ⲛⲉⲩϣⲟⲣⲡ̅’ ⲛ̅ⲉⲓⲟⲧⲉ ⲉⲧⲉ ⲛ̅ⲧⲟ̣ⲥ ⲧⲉ <text:line-break/><text:span text:style-name="T1"> </text:span><text:span text:style-name="T2">(6/12) </text:span> ϯⲙⲛ̅ⲧⲙⲉ ⲛ̅ⲛⲁⲧⲣ̅ ⲙⲗ̅ⲁ̣[ϩ] ⲉⲥ̣[ⲟⲟⲩ]ⲛ̣ ⲙ̅‐ <text:line-break/><text:span text:style-name="T1"> </text:span><text:span text:style-name="T2">(6/13) </text:span> ⲙⲟⲥ ⲛ̅ϩⲏⲧⲥ̅ ϩⲙ̅ ⲡⲉⲧϩ̣ⲏⲡ’· ⲉ̣ⲩ̣ⲛ̅ⲧⲁⲥ <text:line-break/><text:span text:style-name="T1"> </text:span><text:span text:style-name="T2">(6/14) </text:span> ⲛ̅ϯⲡⲗⲁⲛⲏ ⲉⲥϯ ⲉϩⲣⲁⲓ̈ ⲉϫⲱⲥ· ⲉⲃⲟⲗ ⲇⲉ̣ <text:line-break/><text:span text:style-name="T1"> </text:span><text:span text:style-name="T2">(6/15) </text:span> ϩⲙ̅ ⲡⲓⲣⲱⲙⲉ ⲛ̅ⲛⲁⲧⲙⲟⲩ ⲁϥⲟⲩⲱⲛϩ̅ <text:line-break/><text:span text:style-name="T1"> </text:span><text:span text:style-name="T2">(6/16) </text:span> ⲉⲃⲟⲗ ⲛ̅ϣⲟⲣⲡ̅’ ⲛ̅ϭⲓ ⲡⲣⲁⲛ ⲛ̅ϯⲙⲛ̅ⲧⲛⲟ[ⲩ]‐ <text:line-break/><text:span text:style-name="T1"> </text:span><text:span text:style-name="T2">(6/17) </text:span> ⲧⲉ ⲙⲛ̅ ϯⲙⲛ̅ⲧ’ϫⲟⲉⲓⲥ ⲙⲛ̅ ⲟⲩⲙⲛ̅ⲧⲣ̅ⲣ[ⲟ] <text:line-break/><text:span text:style-name="T1"> </text:span><text:span text:style-name="T2">(6/18) </text:span> ⲙⲛ̅ ⲛⲏ ⲉⲧ’ⲙⲛ̅ⲛ̅ⲥⲱⲟⲩ ⲉⲃⲟⲗ ϩⲛ̅ ⲛⲁⲓ̈· <text:line-break/><text:span text:style-name="T1"> </text:span><text:span text:style-name="T2">(6/19) </text:span> ⲡⲏ ⲇⲉ ⲉⲧⲉⲩϯ ⲣⲁ[ⲛ] ⲉⲣⲟ̣[ϥ] ϫⲉ ⲡⲓⲱ̣[ⲧ’] <text:line-break/><text:span text:style-name="T1"> </text:span><text:span text:style-name="T2">(6/20) </text:span> ⲡⲓⲣ̣ⲱ̣ⲙⲉ ⲛ̅ⲧⲉ ⲡϣⲱⲕ ⲟⲩⲉⲓⲱⲧ’ ⲉⲃⲟ̣[ⲗ] <text:line-break/><text:span text:style-name="T1"> </text:span><text:span text:style-name="T2">(6/21) </text:span> ⲙ̅ⲙ[ⲟ]ϥ̣ ⲉⲧⲁϥⲟⲩⲱⲛϩ̅ ⲙ̅ⲡⲁⲓ̈ ⲉⲃⲟⲗ ⲁϥ‐ <text:line-break/><text:span text:style-name="T1"> </text:span><text:span text:style-name="T2">(6/22) </text:span> ϫⲡⲟ ⲛⲁϥ ⲛ̅ⲟⲩⲛⲁϭ ⲛ̅ⲛⲉⲱⲛ· [ⲡⲣⲟ]ⲥ ⲧ[ⲉ]‐ <text:line-break/><text:span text:style-name="T1"> </text:span><text:span text:style-name="T2">(6/23) </text:span> ⲧⲉ ⲧⲱϥ ⲙ̅ⲙⲛ̅ⲧⲛⲁϭ· ⲟⲩⲛ ⲟ̣[ⲩϣⲃⲏⲣ] <text:line-break/><text:span text:style-name="T1"> </text:span><text:span text:style-name="T2">(6/24) </text:span> ⲉϥϣⲟⲟⲡ’ ϩⲛ̅ ⲟⲩϩⲱ→ⲧ̅←ⲡ’· ⲉⲁϥ[ϯ ⲛⲁϥ ⲛ̅ⲟⲩ]‐ <text:line-break/><text:span text:style-name="T1"> </text:span><text:span text:style-name="T2">(6/25) </text:span> ⲛⲁϭ ⲛ̣̅ⲛⲉⲝⲟⲩⲥⲓⲁ· ⲁϥⲣ̅ ⲣ̣̅ⲣ[ⲟ ⲉϩⲣⲁⲓ̈] <text:line-break/><text:span text:style-name="T1"> </text:span><text:span text:style-name="T2">(6/26) </text:span> [ⲉϫⲱⲟ]ⲩ· ⲉⲁϥⲥⲱⲛⲧ̅’ ⲛⲁ̣[ϥ ⲛ̅ϩⲉⲛ]ⲛ̣ⲟⲩ‐ <text:line-break/><text:span text:style-name="T1"> </text:span><text:span text:style-name="T2">(6/27) </text:span> [ⲧⲉ] ⲙⲛ̅ ϩⲉⲛⲁⲣⲭⲁⲅ’ⲅⲉⲗ[ⲟⲥ ϩⲉ]ⲛⲧⲃ[ⲁ̣ ⲙ̅]‐ <text:line-break/><text:span text:style-name="T1"> </text:span><text:span text:style-name="T2">(6/28) </text:span> [ⲙⲛ̅]ⲧⲁⲧ’ϯ ⲏⲡⲉ ⲉⲣⲟⲟⲩ [ⲉϩⲣⲁⲓ̈ ⲉⲩ]ϣⲙ̅ϣ[ⲉ·] <text:line-break/><text:span text:style-name="T1"> </text:span><text:span text:style-name="T2">(6/29) </text:span> ⲉⲃⲟⲗ ⲇⲉ ϩⲙ̅ ⲡⲁⲓ̈ ⲁⲥ̣ⲣ̣̅[ⲁⲣ]〈ⲭ〉ⲓ ⲛ̅ϭⲓ̣ [ϯⲙ]ⲛ̅[ⲧ]‐ <text:line-break/><text:span text:style-name="T1"> </text:span><text:span text:style-name="T2">(6/30) </text:span> [ⲛ]ⲟⲩⲧⲉ̣ ⲙⲛ̅ ϯⲙⲛ̣̅[ⲧ]ϫⲁⲉⲓⲥ̣ [ⲙⲛ̅ ϯⲙⲛ̅ⲧ]‐ <text:line-break/><text:span text:style-name="T1"> </text:span><text:span text:style-name="T2">(6/31) </text:span> [ⲣ̅]ⲣⲟ̣· ⲙⲛ̅ ⲛⲏ ⲉⲧⲟⲩⲏϩ [ⲛ̅ⲥⲱⲟⲩ·] <text:line-break/><text:span text:style-name="T1"> </text:span><text:span text:style-name="T2">(6/32) </text:span> [ⲉⲧⲃ]ⲉ̣ [ⲡⲁⲓ̈] ⲁ̣ⲩϯ̣ ⲣⲁⲛ ⲉ[ⲣⲟϥ ϫⲉ ⲡⲛⲟⲩ]‐ <text:line-break/><text:span text:style-name="T1"> </text:span><text:span text:style-name="T2">(7/1) </text:span> [ⲧⲉ ⲛ̅ⲧⲉ ⲛⲓⲛⲟⲩⲧ]ⲉ̣ ⲡ̣[ⲓϫⲟⲉⲓⲥ ⲛ̅ⲧ]ⲉ̣ <text:line-break/><text:span text:style-name="T1"> </text:span><text:span text:style-name="T2">(7/2) </text:span> [ⲛⲓϫⲟⲉⲓⲥ ⲡⲓⲣ̅ⲣ]ⲟ ⲛ̅ⲧ̣[ⲉ ⲛⲓⲣ̅]ⲣⲱⲟⲩ· <text:line-break/><text:span text:style-name="T1"> </text:span><text:span text:style-name="T2">(7/3) </text:span> [ⲁϥⲟⲩⲱⲛϩ̅ ⲇⲉ ⲉ]ⲃⲟⲗ ϩⲙ̅ [ⲡⲁ]ⲓ̈ ⲛ̅ϭⲓ ⲕⲉ‐ <text:line-break/><text:span text:style-name="T1"> </text:span><text:span text:style-name="T2">(7/4) </text:span> [ 7+- ].ⲟⲥ· ⲉⲧ̣[ⲉ] ⲟⲩⲡⲏⲅⲏ <text:line-break/><text:span text:style-name="T1"> </text:span><text:span text:style-name="T2">(7/5) </text:span> [ⲡⲉ ⲛ̅ⲧⲉ ⲛⲏ ⲉⲧ]ⲁⲩϣⲱ̣[ⲡ]ⲉ̣ ⲙⲛ̅ⲛ̅ⲥⲱϥ· <text:line-break/><text:span text:style-name="T1"> </text:span><text:span text:style-name="T2">(7/6) </text:span> [ⲟⲩⲛ̅ⲧⲁϥ ⲇⲉ ⲛ̅ⲟ]ⲩⲛⲟⲩⲥ ⲙⲛ̅ ⲟⲩⲉⲛ‐ <text:line-break/><text:span text:style-name="T1"> </text:span><text:span text:style-name="T2">(7/7) </text:span> [ⲛⲟⲓⲁ] ⲙ̣ⲛ̅ ⲟⲩⲱϣ· ⲟⲩⲙⲉⲉⲩⲉ ⲇⲉ <text:line-break/><text:span text:style-name="T1"> </text:span><text:span text:style-name="T2">(7/8) </text:span> [ⲙⲛ̅] ⲟⲩⲥⲃ̣[ⲱ] ⲙⲛ̅ ⲟⲩϣⲟϫⲛⲉ· ⲙⲛ̅ <text:line-break/><text:soft-page-break/><text:span text:style-name="T1"> </text:span><text:span text:style-name="T2">(7/9) </text:span> [ⲡⲏ ⲉ]ⲧ’{ϩ̅ⲓ}ϫ[ⲛ̅ⲛ] ⲟⲩϣⲟϫⲛⲉ ⲙⲛ̅ ⲟⲩϭⲟⲙ <text:line-break/><text:span text:style-name="T1"> </text:span><text:span text:style-name="T2">(7/10) </text:span> [ϩ]ⲉ̣ⲛⲙⲉⲗ̣[ⲟⲥ] ⲛ̅ⲧⲉⲗⲓⲟⲥ· ⲁⲩⲱ ⲛ̅ⲛⲁ‐ <text:line-break/><text:span text:style-name="T1"> </text:span><text:span text:style-name="T2">(7/11) </text:span> ⲧⲙⲟ[ⲩ· ⲕⲁⲧ]ⲁ̣ ⲇⲉ ϯⲁⲫⲑⲁⲣⲥⲓⲁ ⲉⲩ‐ <text:line-break/><text:span text:style-name="T1"> </text:span><text:span text:style-name="T2">(7/12) </text:span> ϣ̣ⲏ̣ϣ̣ ⲙⲛ̣̅ [ⲛ]ⲏ̣ ⲉϯⲛⲉ ⲙ̅ⲙⲟⲟⲩ ⲉⲃⲟⲗ· <text:line-break/><text:span text:style-name="T1"> </text:span><text:span text:style-name="T2">(7/13) </text:span> ⲕ[ⲁⲧ]ⲁ̣ ϯϭ[ⲟⲙ] ⲇⲉ ⲥⲉϣⲃ̅ⲃⲓⲏⲟⲩⲧ’· ⲛ̅‐ <text:line-break/><text:span text:style-name="T1"> </text:span><text:span text:style-name="T2">(7/14) </text:span> ⲑⲉ ⲉⲧⲉ ⲟⲩⲱⲧ’ ⲟⲩⲉⲓⲱⲧ’ ⲟⲩⲉⲧ’ <text:line-break/><text:span text:style-name="T1"> </text:span><text:span text:style-name="T2">(7/15) </text:span> ⲟⲩϣⲏⲣⲉ· ⲁⲩⲱ ⲡϣⲏⲣⲉ ⲉⲩⲉⲛⲛⲟⲓⲁ <text:line-break/><text:span text:style-name="T1"> </text:span><text:span text:style-name="T2">(7/16) </text:span> ϯⲉⲛⲛⲟⲓⲁ 〈ⲇ〉ⲉ ⲉⲥⲟⲩⲁⲧⲃ̅ ⲉⲛⲓⲕⲉϣⲱ‐ <text:line-break/><text:span text:style-name="T1"> </text:span><text:span text:style-name="T2">(7/17) </text:span> ϫ̣̅ⲡ̅ ⲧⲏⲣⲟⲩ· ⲁⲩⲱ ⲛ̅ⲑⲉ ⲛ̅ϩⲣⲁⲓ̈ ϩⲛ̅ ⲛⲓⲁⲧ̣‐ <text:line-break/><text:span text:style-name="T1"> </text:span><text:span text:style-name="T2">(7/18) </text:span> ϫⲡⲟ· ⲉⲗⲉϯⲙⲟⲛⲁⲥ ⲁⲩⲱ ϯⲇⲩⲁⲥ <text:line-break/><text:span text:style-name="T1"> </text:span><text:span text:style-name="T2">(7/19) </text:span> ϣ̣ⲁϩⲣⲁⲓ̈ ⲉ[ⲛⲓⲇ]ⲉⲕ̣ⲁⲥ· ⲛⲓⲇⲉⲕⲁⲥ ⲇⲉ <text:line-break/><text:span text:style-name="T1"> </text:span><text:span text:style-name="T2">(7/20) </text:span> ⲥ̣ⲉⲣ̅ⲁⲣ〈ⲭ〉ⲓ ⲉϩⲣⲁⲓ̈ ⲉϫⲛ̅ ⲛⲓⲁⲛϣⲉ̣· <text:line-break/><text:span text:style-name="T1"> </text:span><text:span text:style-name="T2">(7/21) </text:span> ⲛⲓⲁⲛϣⲉ ⲇⲉ ⲥⲉⲣ̅ⲁⲣ〈ⲭ〉ⲉⲓ ⲉϩⲣⲁⲓ̈ ⲉϫⲛ̅ <text:line-break/><text:span text:style-name="T1"> </text:span><text:span text:style-name="T2">(7/22) </text:span> ⲛⲓⲁⲛϣⲟ· ⲛⲓⲁⲛϣⲟ ⲇⲉ ⲥⲉⲣ̅ⲁⲣ〈ⲭ〉ⲉⲓ <text:line-break/><text:span text:style-name="T1"> </text:span><text:span text:style-name="T2">(7/23) </text:span> [ⲉ]ϫⲛ̅ ⲛⲓⲁⲛⲧⲃⲁ· ⲡⲉⲓ̈ⲥⲙⲟⲧ’ ⲟⲛ ⲡⲉ <text:line-break/><text:span text:style-name="T1"> </text:span><text:span text:style-name="T2">(7/24) </text:span> [ⲉⲧ]ϣⲟⲟⲡ’ ϩⲛ̅ ⲛⲓⲁⲧⲙⲟⲩ· ϯⲙⲟⲛⲁⲥ <text:line-break/><text:span text:style-name="T1"> </text:span><text:span text:style-name="T2">(7/25) </text:span> ⲇ̣ⲉ ⲙⲛ̅ ϯⲉ̣[ⲛ]ⲛⲟⲓⲁ· ⲛⲁ ⲡⲓⲣⲱⲙ̣[ⲉ] ⲛ̣̅‐ <text:line-break/><text:span text:style-name="T1"> </text:span><text:span text:style-name="T2">(7/26) </text:span> ⲛ[ⲁ]ⲧ̣[ⲙⲟⲩ·] ⲛ̣ⲓⲙⲉⲉⲩⲉ ϣ[ⲱⲡⲉ] <text:line-break/><text:span text:style-name="T1"> </text:span><text:span text:style-name="T2">(7/27) </text:span> ⲉ〈ⲛ〉ⲇⲉⲕ[ⲁ]ⲥ· ⲛⲓⲁⲛϣⲉ ⲇⲉ ⲛ[ⲉ ⲛⲓⲥⲃⲟ]‐ <text:line-break/><text:span text:style-name="T1"> </text:span><text:span text:style-name="T2">(7/28) </text:span> ⲟⲩⲉ· [ⲛⲓⲁⲛ]ϣ̣[ⲟ ⲇⲉ] ⲛⲉ ⲛⲓϣⲟϫⲛ[ⲉ·] <text:line-break/><text:span text:style-name="T1"> </text:span><text:span text:style-name="T2">(7/29) </text:span> ⲛ[ⲓ]ⲁⲛⲧⲃⲁ [ⲇⲉ ⲛ]ⲉ ⲛⲓϭⲁⲙ· ⲛⲏ [ⲇⲉ ⲉⲧ’]‐ <text:line-break/><text:span text:style-name="T1"> </text:span><text:span text:style-name="T2">(7/30) </text:span> [ϣ]ⲱ̣ⲡⲉ ⲉⲃ[ⲟⲗ ϩⲛ̅] ⲛ̣ⲉⲧ̣[....ⲥⲉ]‐ <text:line-break/><text:span text:style-name="T1"> </text:span><text:span text:style-name="T2">(7/31) </text:span> ϣ̣ⲟⲟⲡ’ ⲙⲛ̅ ⲛⲉⲩⲁ[ 11+- ] <text:line-break/><text:span text:style-name="T1"> </text:span><text:span text:style-name="T2">(7/32) </text:span> [ϩ]ⲛ̣̅ⲛ ⲉⲱ̣[ⲛ] ⲛⲓⲙ[ 12+- ] <text:line-break/><text:span text:style-name="T1"> </text:span><text:span text:style-name="T2">(7/33) </text:span> [...]..[..]ⲁ̣ ϣⲱ̣[ 10+- ] <text:line-break/><text:span text:style-name="T1"> </text:span><text:span text:style-name="T2">(8/1) </text:span> ⲛ̅[ 7+- ] ⲁ̣ⲥⲟ[ⲩⲱⲛϩ̅ ⲉⲃⲟⲗ ϩⲙ̅] <text:line-break/><text:span text:style-name="T1"> </text:span><text:span text:style-name="T2">(8/2) </text:span> ⲡⲛⲟⲩ[ⲥ ⲛ̅]ⲧⲁⲣ[ⲭⲏ ⲛ̅ϭⲓ ϯⲉⲛⲛⲟⲓⲁ] <text:line-break/><text:span text:style-name="T1"> </text:span><text:span text:style-name="T2">(8/3) </text:span> ⲙⲛ̅ ⲛⲓⲙ[ⲉⲉ]ⲩⲉ· ⲁ[ⲩⲱ ⲉⲃⲟⲗ ϩⲛ̅ ⲛⲓ]‐ <text:line-break/><text:span text:style-name="T1"> </text:span><text:span text:style-name="T2">(8/4) </text:span> ⲙⲉⲉⲩⲉ ⲛ̣[ⲓⲥ]ⲃⲱ· ⲉ[ⲃⲟⲗ ϩⲛ̅ ⲛⲓⲥⲃⲱ] <text:line-break/><text:span text:style-name="T1"> </text:span><text:span text:style-name="T2">(8/5) </text:span> ⲛⲓϣⲟϫⲛ̣[ⲉ·] ⲉⲃⲟ[ⲗ ϩⲛ̅ ⲛⲓϣⲟϫⲛⲉ] <text:line-break/><text:span text:style-name="T1"> </text:span><text:span text:style-name="T2">(8/6) </text:span> ⲟⲩϭⲟⲙ· ⲙⲛ̅ⲛ̅ⲥⲁ [ϭ]ⲉ ⲇⲉ ⲙ̅[ⲙⲉⲗⲟⲥ] <text:line-break/><text:span text:style-name="T1"> </text:span><text:span text:style-name="T2">(8/7) </text:span> ⲧⲏⲣⲟⲩ. ⲁ〈ϥ〉ⲟⲩⲱⲛϩ̅ ⲉⲃ̣[ⲟ]ⲗ̣ ϩⲛ̅ ⲛ̣[ⲉϥϭⲟⲙ] <text:line-break/><text:span text:style-name="T1"> </text:span><text:span text:style-name="T2">(8/8) </text:span> ⲛ̅ϭⲓ ⲡⲏ ⲧⲏⲣϥ̅ ⲉⲧⲁⲩ[ⲟⲩ]ⲟ̣ⲛϩ̅ϥ̣ [ⲉⲃⲟⲗ] <text:line-break/><text:span text:style-name="T1"> </text:span><text:span text:style-name="T2">(8/9) </text:span> ⲁⲩⲱ ⲁϥⲟⲩⲱⲛϩ̅ [ⲉⲃⲟⲗ] ϩ̣ⲙ̅ ⲡⲏ̣ [ⲉⲧⲁⲩ]‐ <text:line-break/><text:span text:style-name="T1"> </text:span><text:span text:style-name="T2">(8/10) </text:span> ⲥⲟ〈ⲛ〉ⲧϥ̅ ⲛ̅ϭⲓ ⲡⲏ ⲉⲧⲁⲩⲙ̣[ⲟⲛⲕϥ̅] ⲁⲩⲱ <text:line-break/><text:span text:style-name="T1"> </text:span><text:span text:style-name="T2">(8/11) </text:span> ⲡⲏ ⲉⲧⲁⲩϯ ⲙⲟⲣⲫⲏ ⲛ[ⲁϥ ⲁ]ϥ̣ⲟ̣ⲩ̣ⲱ̣ⲛϩ̅ <text:line-break/><text:span text:style-name="T1"> </text:span><text:span text:style-name="T2">(8/12) </text:span> ⲉⲃⲟⲗ ϩⲙ̅ ⲡⲏ ⲉⲧⲁⲩ[ⲙⲟ]ⲛ̣[ⲕϥ̅·] ⲡ̣ⲏ <text:line-break/><text:span text:style-name="T1"> </text:span><text:span text:style-name="T2">(8/13) </text:span> ⲉⲧⲁⲩϯ ⲣⲁⲛ ⲉⲣⲟϥ· ⲁϥⲟⲩⲱⲛϩ̅ <text:line-break/><text:span text:style-name="T1"> </text:span><text:span text:style-name="T2">(8/14) </text:span> ⲉⲃⲟⲗ ϩⲙ̅ ⲡⲏ ⲉⲧⲁⲩϯ ⲙⲟⲣⲫⲏ ⲛⲁϥ· <text:line-break/><text:span text:style-name="T1"> </text:span><text:span text:style-name="T2">(8/15) </text:span> ⲉⲁϯⲇⲓⲁⲫⲟⲣⲁ ⲛ̅ⲧⲉ ⲛⲏ ⲉⲧⲁⲩϫⲡⲟ‐ <text:line-break/><text:span text:style-name="T1"> </text:span><text:span text:style-name="T2">(8/16) </text:span> ⲟⲩ. ⲟⲩⲱⲛϩ̅ ⲉⲃⲟⲗ ϩⲙ̅ ⲡⲏ ⲉⲧⲁⲩϯ ⲣ̣[ⲁⲛ] <text:line-break/><text:span text:style-name="T1"> </text:span><text:span text:style-name="T2">(8/17) </text:span> ⲉⲣⲟϥ ϫⲓⲛ ⲧⲁⲣⲭⲏ ϣⲁ ⲁⲣⲏϫϥ̅· ⲕⲁⲧ̣ⲁ̣ <text:line-break/><text:span text:style-name="T1"> </text:span><text:span text:style-name="T2">(8/18) </text:span> ⲟⲩϭⲟⲙ ⲛ̅ⲧⲉ ⲛⲓⲉⲱⲛ ⲧⲏ[ⲣ]ⲟⲩ· ⲡⲓⲣⲱ̣‐ <text:line-break/><text:span text:style-name="T1"> </text:span><text:span text:style-name="T2">(8/19) </text:span> ⲙⲉ ⲇⲉ ⲛ̅ⲛⲁⲧⲙⲟⲩ ⲉϥⲙⲉ̣ϩ ⲉⲃⲟⲗ ⲛ̅ⲛ̣[ⲉ]‐ <text:line-break/><text:span text:style-name="T1"> </text:span><text:span text:style-name="T2">(8/20) </text:span> ⲟⲟⲩ̣ ⲛⲓⲙ· ⲛ̅ⲛⲁⲧ’ⲧⲁⲕⲟ ⲙⲛ̅ ⲟⲩⲣⲁϣⲉ̣ <text:line-break/><text:span text:style-name="T1"> </text:span><text:span text:style-name="T2">(8/21) </text:span> ⲛ̅ⲛⲁⲧ’ϣⲁϫⲉ ⲙ̅ⲙⲟϥ· ⲉⲣⲉⲧⲉϥⲙⲛ̅ⲧⲣ̅‐ <text:line-break/><text:span text:style-name="T1"> </text:span><text:span text:style-name="T2">(8/22) </text:span> ⲣⲟ ⲧⲏⲣⲥ̅ ⲧⲉⲗⲏⲗ ⲙ̅ⲙⲟⲥ ⲛ̅ϩⲏⲧⲥ̅ ϩⲛ̅ ⲟⲩ‐ <text:line-break/><text:soft-page-break/><text:span text:style-name="T1"> </text:span><text:span text:style-name="T2">(8/23) </text:span> ⲧⲉⲗⲏⲗ ⲛ̅ϣⲁ ⲉⲛⲉϩ· ⲛⲏ ⲉⲧⲉ ⲙ̅ⲡ̣[ⲟⲩ]‐ <text:line-break/><text:span text:style-name="T1"> </text:span><text:span text:style-name="T2">(8/24) </text:span> ⲥⲱⲧⲙ̅ ⲉⲣⲟⲟⲩ ⲉⲛⲉϩ· ⲟⲩⲧⲉ ⲙ̅[ⲡⲟⲩ]‐ <text:line-break/><text:span text:style-name="T1"> </text:span><text:span text:style-name="T2">(8/25) </text:span> ⲥⲟ[ⲩ]ⲱⲛⲟⲩ ϩⲛ̅ⲛ ⲉ[ⲱ]ⲛ ⲛⲓⲙ ⲉ[ⲧⲁϥ]‐ <text:line-break/><text:span text:style-name="T1"> </text:span><text:span text:style-name="T2">(8/26) </text:span> [ϣ]ⲱ̣ⲡⲉ ⲙⲛ̅ⲛ̅ⲥⲱ̣[ⲟ]ⲩ̣ [ⲙ]ⲛ̅ ⲛⲉϥⲕⲟ[ⲥ]‐ <text:line-break/><text:span text:style-name="T1"> </text:span><text:span text:style-name="T2">(8/27) </text:span> [ⲙⲟⲥ]· ⲙⲛ̅ⲛ̅ⲥⲱϥ ⲁⲥϣ̣[ⲱ]ⲡⲉ ⲛ̅ϭⲓ ⲕ̣[ⲉ]‐ <text:line-break/><text:span text:style-name="T1"> </text:span><text:span text:style-name="T2">(8/28) </text:span> [ⲁ]ⲣ̣ⲭ̣ⲏ ⲉⲃⲟⲗ ϩ[ⲙ̅ ⲡ]ⲓ̣ⲣ̣ⲱ[ⲙⲉ ⲛ̅ⲛⲁⲧⲙⲟⲩ[·] <text:line-break/><text:span text:style-name="T1"> </text:span><text:span text:style-name="T2">(8/29) </text:span> ⲡ̣ⲏ̣ ⲉⲧⲉ ϣⲁⲩϯ [ⲣⲁⲛ ⲉ]ⲣⲟϥ ϫⲉ ⲡⲓⲣⲉϥ̣‐ <text:line-break/><text:span text:style-name="T1"> </text:span><text:span text:style-name="T2">(8/30) </text:span> [ϫⲡⲟ] ⲛ̅ϫⲱⲕ ⲉ̣[ⲃⲟⲗ ⲙ̅]ⲙ̣ⲟϥ ⲟⲩ̣[ⲁⲁϥ·] <text:line-break/><text:span text:style-name="T1"> </text:span><text:span text:style-name="T2">(8/31) </text:span> [ⲛ̅ⲧⲉⲣⲉϥϫⲓ ⲡⲓϯ] ⲙ̣ⲉ̣ⲧ̣ⲉ̣ ⲛ̣̅ⲧⲉϥⲥⲩⲛ[ⲍⲩⲅⲟⲥ] <text:line-break/><text:span text:style-name="T1"> </text:span><text:span text:style-name="T2">(8/32) </text:span> [ϯⲛⲟϭ ⲛ̅ⲥⲟⲫⲓⲁ ⲁϥ]ⲟⲩⲱ̣ⲛ̣ϩ̅ ⲉⲃ̣[ⲟⲗ ⲙ̅]‐ <text:line-break/><text:span text:style-name="T1"> </text:span><text:span text:style-name="T2">(8/33) </text:span> [ⲡⲓϣⲟⲣⲡ̅’ ⲙ̅ⲙⲓⲥⲉ ⲉⲧ]ⲙ̅ⲙⲁ[ⲩ] ⲛ̣̅ϩ̣[ⲟⲟⲩⲧ’] <text:line-break/><text:span text:style-name="T1"> </text:span><text:span text:style-name="T2">(9/1) </text:span> [ⲥ{ϩ̅ⲓ}ⲙⲉ· ⲡⲏ ⲉⲧ]ⲉ̣ ϣⲁ̣[ⲩϯ ⲣ]ⲁⲛ <text:line-break/><text:span text:style-name="T1"> </text:span><text:span text:style-name="T2">(9/2) </text:span> [ⲉⲣⲟϥ ϫⲉ ⲡⲓϣⲏⲣⲉ] ⲛ̅ϣⲟⲣ̣[ⲡ̅’] ⲙ̣̅ⲙⲓⲥⲉ <text:line-break/><text:span text:style-name="T1"> </text:span><text:span text:style-name="T2">(9/3) </text:span> [ⲛ̅ⲧⲉ ⲡⲛⲟⲩⲧⲉ]· ⲧⲉϥ[ⲙⲛ̅]ⲧ’ⲥ{ϩ̅ⲓ}ⲙⲉ <text:line-break/><text:span text:style-name="T1"> </text:span><text:span text:style-name="T2">(9/4) </text:span> [ϫⲉ ϯϣⲟⲣⲡⲉ] ⲙ̅ⲙⲓ[ⲥⲉ] ⲛ̣̅ⲥⲟⲫⲓⲁ <text:line-break/><text:span text:style-name="T1"> </text:span><text:span text:style-name="T2">(9/5) </text:span> [ϯⲙⲁⲁⲩ ⲙ̅ⲡⲧⲏⲣ]ϥ̅· ⲉⲧⲉ ϣⲁⲣⲉϩⲟ‐ <text:line-break/><text:span text:style-name="T1"> </text:span><text:span text:style-name="T2">(9/6) </text:span> [ⲓ̈ⲛⲉ ⲙⲟⲩⲧⲉ] ⲉⲣⲟⲥ ϫⲉ ⲧⲁⲅⲁⲡⲏ· <text:line-break/><text:span text:style-name="T1"> </text:span><text:span text:style-name="T2">(9/7) </text:span> [ⲛ̅ⲧⲟϥ ⲇⲉ ⲡⲓ]ϣⲟⲣⲡ̅’ ⲙ̅ⲙⲓⲥⲉ ⲉⲩⲛ̅‐ <text:line-break/><text:span text:style-name="T1"> </text:span><text:span text:style-name="T2">(9/8) </text:span> [ⲧⲁϥ ⲛ̅ⲧⲉϥⲉ]ⲝ̣ⲟⲩⲥⲓⲁ ⲉⲃⲟⲗ ϩⲙ̅ <text:line-break/><text:span text:style-name="T1"> </text:span><text:span text:style-name="T2">(9/9) </text:span> [ⲡⲉ]ϥ̣[ⲉⲓⲱⲧ’· ⲁϥ]ⲧ̣ⲁⲙⲓⲟ ⲛⲁϥ ⲛ̅ⲟⲩ‐ <text:line-break/><text:span text:style-name="T1"> </text:span><text:span text:style-name="T2">(9/10) </text:span> ⲛⲁϭ ⲛ̣̅[ⲉⲱⲛ] ⲡⲣⲟⲥ ⲧⲉϥⲙⲛ̅ⲧⲛⲟϭ· <text:line-break/><text:span text:style-name="T1"> </text:span><text:span text:style-name="T2">(9/11) </text:span> ⲉ̣[ϥⲧⲁⲙⲓⲟ] ⲛ̣ⲁϥ ⲛ̅ϩⲉⲛⲁⲅ’ⲅⲉⲗⲟⲥ <text:line-break/><text:span text:style-name="T1"> </text:span><text:span text:style-name="T2">(9/12) </text:span> ⲛ̣̅ⲛ̣ⲁ̣[ⲛ]ⲧ̣ⲃ̣ⲁ̣ ⲛ̣̅ⲛⲁⲧ’ϯ ⲏⲡⲉ ⲉⲣⲟⲟⲩ <text:line-break/><text:span text:style-name="T1"> </text:span><text:span text:style-name="T2">(9/13) </text:span> ⲉϩⲣⲁⲓ̈ ⲉⲩϣⲙ̅ϣⲉ· ⲡⲁϣⲉⲓ̈ ⲧⲏⲣϥ̅ <text:line-break/><text:span text:style-name="T1"> </text:span><text:span text:style-name="T2">(9/14) </text:span> ⲛ̅ⲛⲓⲁⲅ’ⲅⲉⲗⲟⲥ ⲉϣⲁⲩⲙⲟⲩⲧⲉ ⲉⲣⲟ‐ <text:line-break/><text:span text:style-name="T1"> </text:span><text:span text:style-name="T2">(9/15) </text:span> ⲟⲩ ϫⲉ ⲧⲉⲕⲕⲗⲏⲥⲓⲁ ⲛ̅ⲛⲉⲧ’ⲟⲩⲁⲁⲃ <text:line-break/><text:span text:style-name="T1"> </text:span><text:span text:style-name="T2">(9/16) </text:span> ⲛ̣ⲏ ⲉⲧⲉ ⲛ̅ⲟⲩⲟⲉⲓⲛ ⲙⲛ̅ ⲛⲓⲁⲧ’ϩⲁⲉⲓ‐ <text:line-break/><text:span text:style-name="T1"> </text:span><text:span text:style-name="T2">(9/17) </text:span> [ⲃ]ⲉ 〈ⲛⲉ〉· ⲛⲓⲁⲅ’ⲅⲉⲗⲟⲥ ⲟⲩⲛ ⲉⲧⲙ̅ⲙⲁⲩ <text:line-break/><text:span text:style-name="T1"> </text:span><text:span text:style-name="T2">(9/18) </text:span> [ⲉ]ϣⲱⲡⲉ ⲉⲩϣⲁⲛϯ ⲡⲓ ⲉⲣⲛ̅ ⲛⲉⲩ‐ <text:line-break/><text:span text:style-name="T1"> </text:span><text:span text:style-name="T2">(9/19) </text:span> ⲉ̣ⲣ̣ⲏ̣ⲟ̣ⲩ· ϣⲁⲣⲉⲛⲉⲩⲁⲥⲡⲁⲥⲙⲟⲥ· <text:line-break/><text:span text:style-name="T1"> </text:span><text:span text:style-name="T2">(9/20) </text:span> [ϣⲱⲡ]ⲉ ⲛ̅ϩⲉⲛⲁⲅ’ⲅⲉⲗⲟⲥ ⲉⲩⲉⲓⲛⲉ <text:line-break/><text:span text:style-name="T1"> </text:span><text:span text:style-name="T2">(9/21) </text:span> [ⲙ̅ⲙⲟⲟⲩ·] ⲡⲉⲩϣⲟⲣⲡ̅’ ⲙ̅ⲙⲓⲥⲉ <text:line-break/><text:span text:style-name="T1"> </text:span><text:span text:style-name="T2">(9/22) </text:span> [.....ⲛ̅ⲉⲓ]ⲱⲧ’ ϣ̣[ⲁ]ⲩ̣ϯ ⲣⲁⲛ̣ [ⲉⲣ]ⲟϥ <text:line-break/><text:span text:style-name="T1"> </text:span><text:span text:style-name="T2">(9/23) </text:span> [ϫⲉ.....].[.]ⲛⲟ̣[ⲩⲥ· ⲁ]ⲇⲁ[ⲙ ⲉⲧ]ⲉ <text:line-break/><text:span text:style-name="T1"> </text:span><text:span text:style-name="T2">(9/24) </text:span> [ⲡⲓⲃⲁⲗ ⲙ̅ⲡⲟⲩⲟⲉⲓⲛ ⲡⲉ] ⲡⲏ [ⲉⲧⲁϥ] <text:line-break/><text:span text:style-name="T1"> </text:span><text:span text:style-name="T2">(9/25) </text:span> [{ⲉ̅ⲓ} ⲉⲃⲟⲗ ϩⲙ̅ ⲡⲟⲩⲟⲉⲓⲛ·] ⲡⲓϣ̣[ⲏⲣⲉ] <text:line-break/><text:span text:style-name="T1"> </text:span><text:span text:style-name="T2">(9/26) </text:span> [ⲉⲧⲉⲣⲉⲧⲉϥⲙⲛ̅ⲧⲣ̅ⲣⲟ ⲙ]ⲉϩ ⲧ̣[ⲏⲣⲥ̅] <text:line-break/><text:span text:style-name="T1"> </text:span><text:span text:style-name="T2">(9/27) </text:span> [ⲛ̅ⲟⲩⲣⲁϣⲉ ⲛ̅ⲛⲁⲧϣⲁ]ϫ̣ⲉ ⲙ̅ⲙ[ⲟϥ] <text:line-break/><text:span text:style-name="T1"> </text:span><text:span text:style-name="T2">(9/28) </text:span> [ 21+- ] <text:line-break/><text:span text:style-name="T1"> </text:span><text:span text:style-name="T2">(9/29) </text:span> [ 21+- ] <text:line-break/><text:span text:style-name="T1"> </text:span><text:span text:style-name="T2">(9/30) </text:span> [ 21+- ] <text:line-break/><text:span text:style-name="T1"> </text:span><text:span text:style-name="T2">(9/31) </text:span> [ 21+- ] <text:line-break/><text:span text:style-name="T1"> </text:span><text:span text:style-name="T2">(9/32) </text:span> [ 21+- ] <text:line-break/><text:span text:style-name="T1"> </text:span><text:span text:style-name="T2">(9/33) </text:span> [ 11+- ⲟⲩⲇⲉ ⲙ̅ⲡⲉϥⲟⲩ]‐ <text:line-break/><text:span text:style-name="T1"> </text:span><text:span text:style-name="T2">(10/1) </text:span> [ⲱⲛϩ̅ ϩⲛ̅ⲛ ⲉⲱ]ⲛ ⲛ̣[ⲓⲙ· ⲉⲧⲁⲩϣⲱⲡⲉ] <text:line-break/><text:span text:style-name="T1"> </text:span><text:span text:style-name="T2">(10/2) </text:span> ⲙⲛ̅ⲛⲥⲱ̣[ⲟⲩ] ⲙⲛ̅ [ⲛⲉⲩⲕⲟⲥⲙⲟⲥ· ⲙⲛ̅] <text:line-break/><text:span text:style-name="T1"> </text:span><text:span text:style-name="T2">(10/3) </text:span> ⲛ̅ⲥⲱϥ ⲁ[ϥ]ϣ̣ⲱⲡⲉ̣ [ⲛ̅ϭⲓ...ⲉⲃⲟⲗ] <text:line-break/><text:soft-page-break/><text:span text:style-name="T1"> </text:span><text:span text:style-name="T2">(10/4) </text:span> ϩⲙ̅ ⲡⲁⲓ̈· ⲉ̣[ⲧ]ⲉ ⲡϣⲏ̣[ⲣⲉ ⲙ̅ⲡⲓⲣⲱⲙⲉ] <text:line-break/><text:span text:style-name="T1"> </text:span><text:span text:style-name="T2">(10/5) </text:span> ⲡⲉ· ⲉⲁϥ[ϯ] ⲙⲉⲧⲉ̣ [ⲙⲛ̅ ⲧⲥⲟⲫⲓⲁ ⲧⲉϥ]‐ <text:line-break/><text:span text:style-name="T1"> </text:span><text:span text:style-name="T2">(10/6) </text:span> ⲥⲩⲛⲍⲩⲅⲟⲥ· ⲁϥ[ⲟⲩⲱⲛϩ̅ ⲉⲃⲟⲗ] <text:line-break/><text:span text:style-name="T1"> </text:span><text:span text:style-name="T2">(10/7) </text:span> ⲛⲟⲩⲛⲟϭ ⲙ̅ⲫⲱⲥ[ⲧⲏⲣ ⲉϥⲉ ⲛ̅ϩⲟ]‐ <text:line-break/><text:span text:style-name="T1"> </text:span><text:span text:style-name="T2">(10/8) </text:span> ⲟⲩⲧ’ⲥ{ϩ̅ⲓ}ⲙⲉ· ⲉⲧⲉ̣ [ⲡⲉϥⲣⲁⲛ ⲛ̅ϩⲟ]‐ <text:line-break/><text:span text:style-name="T1"> </text:span><text:span text:style-name="T2">(10/9) </text:span> ⲟⲩⲧ’ ϣⲁⲩⲙⲟⲩ[ⲧⲉ ⲉⲣⲟϥ ϫ]ⲉ ⲡ[ⲥⲱ]‐ <text:line-break/><text:span text:style-name="T1"> </text:span><text:span text:style-name="T2">(10/10) </text:span> ⲧⲏⲣ ⲡⲓⲣⲉϥϫⲡⲟ ⲛ̅ⲧ[ⲉ ⲛⲓⲧⲏⲣ]ⲟⲩ· <text:line-break/><text:span text:style-name="T1"> </text:span><text:span text:style-name="T2">(10/11) </text:span> ⲡⲉϥⲣⲁⲛ ⲙ̅ⲙⲛ̅ⲧ’ⲥ{ϩ̅ⲓ}ⲙ̣[ⲉ ϣⲁⲣⲉϩ]ⲟ‐ <text:line-break/><text:span text:style-name="T1"> </text:span><text:span text:style-name="T2">(10/12) </text:span> ⲉⲓⲛⲉ ϯ ⲣⲁⲛ ⲉⲣⲟⲥ ϫⲉ [ⲧⲡⲓⲥⲧⲓⲥ] ⲧ̣ⲥ̣[ⲟ]‐ <text:line-break/><text:span text:style-name="T1"> </text:span><text:span text:style-name="T2">(10/13) </text:span> ⲫⲓⲁ· ⲉⲧⲁⲡⲥⲱⲧⲏⲣ ⲟⲩⲛ ϯ ⲙⲉⲧⲉ <text:line-break/><text:span text:style-name="T1"> </text:span><text:span text:style-name="T2">(10/14) </text:span> ⲙⲛ̅ ⲧⲉϥ̣ⲥⲩⲛⲍⲩⲅⲟⲥ ⲧⲡⲓⲥⲧⲓⲥ· <text:line-break/><text:span text:style-name="T1"> </text:span><text:span text:style-name="T2">(10/15) </text:span> ⲧⲥⲟⲫⲓⲁ· ⲁϥⲟⲩⲱⲛϩ̅ ⲉⲃⲟⲗ ⲛ̅ⲛⲟⲩⲁ[ⲛ]‐ <text:line-break/><text:span text:style-name="T1"> </text:span><text:span text:style-name="T2">(10/16) </text:span> ⲥⲟⲟⲩ ⲙ̅ⲡ̅ⲛ̅ⲓ̅ⲕ̅ⲏ̅ ⲉⲥⲉ ⲛ̅ϩⲟⲟⲩⲧ’ <text:line-break/><text:span text:style-name="T1"> </text:span><text:span text:style-name="T2">(10/17) </text:span> ⲥ{ϩ̅ⲓ}ⲙⲉ· ⲉⲧⲉ ⲛ̅ⲣⲁⲛ ⲛ̅ⲧⲉ̣ⲩⲙⲛ̅ⲧ’̣[ϩⲟ]‐ <text:line-break/><text:span text:style-name="T1"> </text:span><text:span text:style-name="T2">(10/18) </text:span> ⲟⲩⲧ’ ⲛⲁⲓ̈ ⲛⲉ· ⲡϣⲟⲣⲡ̅’ ⲡⲉ ⲡ〈ⲓ〉ⲁⲧ̣‐ <text:line-break/><text:span text:style-name="T1"> </text:span><text:span text:style-name="T2">(10/19) </text:span> ϫⲡⲟ ⲧⲏⲣ〈ϥ〉· ⲡⲙⲉϩⲥⲛⲁⲩ [ⲡⲉ] <text:line-break/><text:span text:style-name="T1"> </text:span><text:span text:style-name="T2">(10/20) </text:span> ⲡⲓϫⲡⲟ ⲉⲃⲟⲗ ⲙ̅ⲙⲟϥ· ⲡⲓ̣ⲙ̣[ⲉϩϣⲟⲙⲛ̅ⲧ] <text:line-break/><text:span text:style-name="T1"> </text:span><text:span text:style-name="T2">(10/21) </text:span> ⲡⲉ ⲡⲏ ⲉⲧⲁⲩ̣ϫ̣ⲡⲟϥ[· ⲡⲙⲉϩϥⲧⲟ]‐ <text:line-break/><text:span text:style-name="T1"> </text:span><text:span text:style-name="T2">(10/22) </text:span> ⲟⲩ [ⲡⲉ] ⲡⲓϫⲡ[ⲟ] ⲛ̅ⲧⲉ ⲡ[ϣⲟⲣⲡ̅’·] <text:line-break/><text:span text:style-name="T1"> </text:span><text:span text:style-name="T2">(10/23) </text:span> ⲡⲙ̣[ⲉϩ]ϯ̣ⲟⲩ [ⲡⲉ ⲡⲓϫⲡⲟ ⲧⲏⲣϥ̅· ⲡⲙⲉϩ]‐ <text:line-break/><text:span text:style-name="T1"> </text:span><text:span text:style-name="T2">(10/24) </text:span> [ⲥⲟⲟⲩ] ⲡ[ⲉ 15+- ] <text:line-break/><text:span text:style-name="T1"> </text:span><text:span text:style-name="T2">(10/25) </text:span> [....] ⲛⲓⲣ̣[ⲁⲛ ⲛ̅ⲧⲉⲩⲙⲛⲧ’ⲥ{ϩ̅ⲓ}ⲙⲉ] <text:line-break/><text:span text:style-name="T1"> </text:span><text:span text:style-name="T2">(10/26) </text:span> [ⲛⲁⲓ̈ ⲛⲉ·]ϯϩ[ⲟⲩⲉⲓⲧⲉ ⲡⲉ 6+-] <text:line-break/><text:span text:style-name="T1"> </text:span><text:span text:style-name="T2">(10/27) </text:span> (6+- lines lacking) <text:line-break/><text:span text:style-name="T1"> </text:span><text:span text:style-name="T2">(11/1) </text:span> [ 12+- ].[ 10+- ] <text:line-break/><text:span text:style-name="T1"> </text:span><text:span text:style-name="T2">(11/2) </text:span> [ 13+- ] ϯ[ⲙⲉϩϯⲉ ⲡⲉ] <text:line-break/><text:span text:style-name="T1"> </text:span><text:span text:style-name="T2">(11/3) </text:span> [ⲧⲁⲅⲁⲡⲏ ⲧⲥⲟⲫ]ⲓ̣ⲁ· ϯ[ⲙⲉ]ϩ̣[ⲥⲟ ⲡⲉ] <text:line-break/><text:span text:style-name="T1"> </text:span><text:span text:style-name="T2">(11/4) </text:span> [ⲧⲡⲓⲥⲧⲓⲥ ⲧ]ⲥⲟⲫⲓ[ⲁ· ⲟ]ⲩⲛ̅ⲧⲁⲩ <text:line-break/><text:span text:style-name="T1"> </text:span><text:span text:style-name="T2">(11/5) </text:span> [ⲇⲉ ⲛ̅ϩⲉⲛⲕⲉⲣ]ⲁ̣ⲛ· ⲛ[ⲏ ⲉ]ⲧⲁⲓ̈ⲧⲁⲁⲩ <text:line-break/><text:span text:style-name="T1"> </text:span><text:span text:style-name="T2">(11/6) </text:span> [ⲛⲏⲧⲛ̅ ⲛ̅ϣⲟⲣⲡ̅’· ⲉ]ⲃⲟⲗ ⲇⲉ ϩⲙ̅ ⲡⲓϯ ⲙⲉ‐ <text:line-break/><text:span text:style-name="T1"> </text:span><text:span text:style-name="T2">(11/7) </text:span> [ⲧⲉ ⲛ̅ⲧⲁⲩ] ⲉ̣ⲧⲁⲩⲣ̅ ϣⲟⲣⲡ̅’ ⲛ̅ϫⲟⲟⲩ· <text:line-break/><text:span text:style-name="T1"> </text:span><text:span text:style-name="T2">(11/8) </text:span> [ⲁⲩⲟⲩⲱⲛϩ̅] ⲉⲃⲟⲗ ⲛ̅ϭⲓ ϩⲉⲛⲉⲛⲛⲟⲓⲁ <text:line-break/><text:span text:style-name="T1"> </text:span><text:span text:style-name="T2">(11/9) </text:span> [ϩⲛ̅ ϩⲉⲛⲉⲱⲛ] ⲉⲁⲩⲣ̅ ϣⲟⲣⲡ̅’ ⲛ̅ϫⲟⲟⲩ <text:line-break/><text:span text:style-name="T1"> </text:span><text:span text:style-name="T2">(11/10) </text:span> ⲉⲃⲟ[ⲗ ⲇⲉ ϩⲛ̅] ⲛⲓⲉⲛⲛⲟⲓⲁ ⲛⲓⲙⲉⲉⲩⲉ· <text:line-break/><text:span text:style-name="T1"> </text:span><text:span text:style-name="T2">(11/11) </text:span> ⲉ[ⲃⲟⲗ ⲇⲉ ϩⲛ̅] ⲛⲓⲙⲉⲉⲩⲉ ⲛⲓⲥⲃⲟⲟⲩⲉ· <text:line-break/><text:span text:style-name="T1"> </text:span><text:span text:style-name="T2">(11/12) </text:span> ⲉ̣ⲃ̣[ⲟⲗ ⲇⲉ ϩⲛ̅] ⲛⲓⲥⲃⲟⲟⲩⲉ ⲛⲓϣⲟϫⲛⲉ· <text:line-break/><text:span text:style-name="T1"> </text:span><text:span text:style-name="T2">(11/13) </text:span> ⲉⲃⲟⲗ ⲇⲉ ϩⲛ̅ ⲛⲓϣⲟϫⲛⲉ ⲛⲓⲟⲩⲱϣ· <text:line-break/><text:span text:style-name="T1"> </text:span><text:span text:style-name="T2">(11/14) </text:span> ⲉⲃⲟⲗ ⲇⲉ ϩⲛ̅ ⲛⲓⲟⲩⲱϣ ⲛⲉ ⲛⲓϣⲁϫⲉ· <text:line-break/><text:span text:style-name="T1"> </text:span><text:span text:style-name="T2">(11/15) </text:span> ⲟⲩⲛ̅ⲧⲁⲩ ⲇⲉ ⲛ̅ϩⲉⲛⲕⲉⲣⲁⲛ· ⲛⲓⲉⲛ‐ <text:line-break/><text:span text:style-name="T1"> </text:span><text:span text:style-name="T2">(11/16) </text:span> ⲛ̣ⲟⲓⲁ ⲇⲉ ϣⲁⲩⲙⲟⲩⲧⲉ ⲉⲣⲟⲟⲩ ϫⲉ <text:line-break/><text:span text:style-name="T1"> </text:span><text:span text:style-name="T2">(11/17) </text:span> ⲛ̣ⲓ̣ⲛⲟⲩⲧⲉ· ⲛⲓⲙⲉⲉⲩⲉ ⲇⲉ ϫⲉ ⲛⲓ‐ <text:line-break/><text:span text:style-name="T1"> </text:span><text:span text:style-name="T2">(11/18) </text:span> [ϫⲟ]ⲉⲓⲥ· ⲛⲓⲥⲃⲱ ⲛⲉ ⲛⲓⲁⲅ’ⲅⲉⲗⲟⲥ· <text:line-break/><text:span text:style-name="T1"> </text:span><text:span text:style-name="T2">(11/19) </text:span> ⲛ̣ⲓϣⲟ̣ϫⲛⲉ ⲛⲉ ⲛⲓⲁⲅ’ⲅⲉⲗⲟⲥ· ⲛⲓⲟⲩ‐ <text:line-break/><text:span text:style-name="T1"> </text:span><text:span text:style-name="T2">(11/20) </text:span> [ⲱϣ ⲛ]ⲉ ⲛⲓϣⲁϫⲉ· ϯⲁⲛⲙⲛ̅ⲧ’〈ⲥⲛⲟⲟⲩⲥ〉 ⲓ̅ⲃ̅ <text:line-break/><text:span text:style-name="T1"> </text:span><text:span text:style-name="T2">(11/21) </text:span> [ⲇⲉ] ⲛ̣̅ⲧⲉ ⲛⲓϭⲟⲙ ⲉⲧⲉ ⲁⲩⲣ̅ ϣⲟ‐ <text:line-break/><text:span text:style-name="T1"> </text:span><text:span text:style-name="T2">(11/22) </text:span> [ⲣⲡ̅’ ⲛ̅]ϫ̣[ⲟⲟ]ⲩ ⲉⲧⲁⲩⲉⲓⲣⲉ ⲛ̅ⲛⲟⲩ̣ϯ <text:line-break/><text:span text:style-name="T1"> </text:span><text:span text:style-name="T2">(11/23) </text:span> [ⲙⲉⲧ]ⲉ· ⲁⲩⲟⲩⲱⲛϩ̅ ⲉⲃⲟⲗ ⲛ̣̅ⲛⲟⲩⲁⲛ‐ <text:line-break/><text:soft-page-break/><text:span text:style-name="T1"> </text:span><text:span text:style-name="T2">(11/24) </text:span> [ⲥⲟ ⲛ̅ϭⲟⲙ ⲙ̅ⲡ̅ⲛ̅]ⲓ̅ⲕⲏ̅ ⲧⲟ̣ⲩⲉ̣[ⲓ] ⲧⲟⲩⲉ̣[ⲓ] <text:line-break/><text:span text:style-name="T1"> </text:span><text:span text:style-name="T2">(11/25) </text:span> [ⲙ̅]ⲙⲟⲟⲩ̣ ⲛ̅ⲑⲉ ⲉⲧ[ⲉ ⲛⲏ] ⲙ̅ⲙ[ⲛ̅ⲧ’ϩⲟⲟⲩⲧ’] <text:line-break/><text:span text:style-name="T1"> </text:span><text:span text:style-name="T2">(11/26) </text:span> [ⲛ̅]ⲧ̣ⲉ ⲛⲉⲩⲥⲟⲟ̣[ⲩ· ⲉⲩⲉ] ⲛ̅ⲥⲟⲟⲩ ⲥ̣ⲟ̣[ⲟⲩ·] <text:line-break/><text:span text:style-name="T1"> </text:span><text:span text:style-name="T2">(11/27) </text:span> [ϩⲱ]ⲥ̣ⲧⲉ ⲛ̣[ⲏ ⲉⲧ]ϣ̣ⲱⲡⲉ ⲛ̅{ϩ̣̅̅[̅ⲓ}ⲟⲙⲉ ⲙ̅]‐ <text:line-break/><text:span text:style-name="T1"> </text:span><text:span text:style-name="T2">(11/28) </text:span> [ⲡ̅ⲛ̅]ⲁ̣· ⲉⲩ̣[ⲉ ⲛ̅ⲥⲟ] ⲥ̣[ⲟ· ⲁⲩⲱ ⲛⲁⲓ̈ ⲉⲧ]‐ <text:line-break/><text:span text:style-name="T1"> </text:span><text:span text:style-name="T2">(11/29) </text:span> ⲉ ⲛⲓⲁ[ⲛϣϥⲉⲥⲛⲟⲟⲩⲥ ⲛ̅ⲧⲉ ⲛⲓⲇ]ⲩⲛ‐ <text:line-break/><text:span text:style-name="T1"> </text:span><text:span text:style-name="T2">(11/30) </text:span> [ⲁⲙⲓⲥ ⲛⲉ ⲁⲩⲟⲩⲱⲛϩ̅ ⲉⲃⲟⲗ 6+-] <text:line-break/><text:span text:style-name="T1"> </text:span><text:span text:style-name="T2">(11/31) </text:span> (2+- lines lacking) <text:line-break/><text:span text:style-name="T1"> </text:span><text:span text:style-name="T2">(12/1) </text:span> [.ⲛⲓⲁⲛϣⲙ]ⲛ̣̅ⲧ’ϣ̣[ⲉⲥⲉ· ⲡⲉⲩϩⲱⲧⲣ̅ ⲡⲉ] <text:line-break/><text:span text:style-name="T1"> </text:span><text:span text:style-name="T2">(12/2) </text:span> [ⲡⲓⲟⲩⲱϣ ⲙ̅ⲡⲓ]ⲱⲧ’· ⲡ̣[ⲏ ⲉⲧⲁϥⲟⲩⲟⲛϩⲟⲩ] <text:line-break/><text:span text:style-name="T1"> </text:span><text:span text:style-name="T2">(12/3) </text:span> ϫⲉ ⲉⲩ[ⲉϣ]ⲱⲡⲉ [ⲛ̅ϩⲉⲛⲧⲩⲡⲟⲥ·] <text:line-break/><text:span text:style-name="T1"> </text:span><text:span text:style-name="T2">(12/4) </text:span> ⲡⲓⲣⲱⲙ[ⲉ ϭ]ⲉ ⲛ̅ⲛ[ⲁⲧⲙⲟⲩ ⲁⲡⲉⲛⲉⲱⲛ] <text:line-break/><text:span text:style-name="T1"> </text:span><text:span text:style-name="T2">(12/5) </text:span> ϣⲱⲡⲉ ⲙ̅ⲡⲉϥⲧ[ⲩⲡⲟⲥ· ⲡⲓⲭⲣⲟⲛⲟⲥ] <text:line-break/><text:span text:style-name="T1"> </text:span><text:span text:style-name="T2">(12/6) </text:span> ⲇⲉ ⲉⲧⲁϥϣⲱⲡⲉ ⲛ̅ⲟ[ⲩⲧⲩⲡⲟⲥ ⲛ̅]‐ <text:line-break/><text:span text:style-name="T1"> </text:span><text:span text:style-name="T2">(12/7) </text:span> ⲧⲉ ⲡⲓϣⲟⲣⲡ̅’ ⲛ̅ϫⲡⲟ ⲛ̣̅[ⲧⲉϥ ⲛ̅ϣⲏⲣⲉ·] <text:line-break/><text:span text:style-name="T1"> </text:span><text:span text:style-name="T2">(12/8) </text:span> ϯⲣⲟⲙⲡⲉ ⲇⲉ ⲁⲥϣ[ⲱⲡⲉ ⲛ̅ⲟⲩⲧⲩⲡⲟⲥ] <text:line-break/><text:span text:style-name="T1"> </text:span><text:span text:style-name="T2">(12/9) </text:span> ⲛ̅ⲧⲉ ⲡⲥ̅ⲣ̅· ⲡⲓⲙⲛ̅ⲧ’[ⲥⲛⲟⲟⲩ]ⲥ ⲇⲉ <text:line-break/><text:span text:style-name="T1"> </text:span><text:span text:style-name="T2">(12/10) </text:span> ⲛ̅ⲛⲉⲃⲟⲧ’. ⲁⲩϣⲱⲡ[ⲉ ⲛ̅ⲟⲩⲧⲩⲡ]ⲟⲥ <text:line-break/><text:span text:style-name="T1"> </text:span><text:span text:style-name="T2">(12/11) </text:span> ⲛ̅ⲧⲉ ϯⲙⲛ̅ⲧ’ⲥⲛⲟⲟⲩ[ⲥ ⲛ̅ϭⲟⲙ ⲉⲧ]ⲁⲩ‐ <text:line-break/><text:span text:style-name="T1"> </text:span><text:span text:style-name="T2">(12/12) </text:span> ⲟⲩⲱⲛϩ̅ ⲉⲃⲟⲗ ϩⲙ̅ ⲡⲥ̅ⲣ̅· ⲛⲓⲁⲅ’ⲅⲉⲗⲟⲥ <text:line-break/><text:span text:style-name="T1"> </text:span><text:span text:style-name="T2">(12/13) </text:span> ⲛⲉ ⲡⲓϣⲙⲛ̅ⲧ’ϣⲉⲥⲉ ⲛ̅ϩⲟⲟⲩ ⲛ̅ⲧⲉ <text:line-break/><text:span text:style-name="T1"> </text:span><text:span text:style-name="T2">(12/14) </text:span> ⲧⲉⲣⲟⲙⲡⲉ· ⲁⲩϣⲱⲡⲉ ⲛ̅ⲟⲩⲧⲩ‐ <text:line-break/><text:span text:style-name="T1"> </text:span><text:span text:style-name="T2">(12/15) </text:span> ⲡⲟⲥ ⲛ̅ⲧⲉ ϯϣⲙⲛ̅ⲧ’ϣⲉⲥⲉ ⲛ̅ϭⲟⲙ <text:line-break/><text:span text:style-name="T1"> </text:span><text:span text:style-name="T2">(12/16) </text:span> ⲉⲧⲁⲩⲟⲩⲱⲛϩ̅ ⲉⲃⲟⲗ ϩⲙ̅ ⲡⲥⲱⲧⲏⲣ· <text:line-break/><text:span text:style-name="T1"> </text:span><text:span text:style-name="T2">(12/17) </text:span> ⲛⲓⲁⲅ’ⲅⲉⲗⲟⲥ ⲇⲉ ⲉⲧⲁⲩϣⲱⲡⲉ ⲉⲃ̣[ⲟⲗ] <text:line-break/><text:span text:style-name="T1"> </text:span><text:span text:style-name="T2">(12/18) </text:span> ϩⲛ̅ ⲛⲁⲓ̈ ⲉⲩⲉ ⲛ̅ⲛⲁⲧ’ϯ ⲏⲡⲉ ⲉⲣⲟⲟⲩ[·] <text:line-break/><text:span text:style-name="T1"> </text:span><text:span text:style-name="T2">(12/19) </text:span> ⲁⲩϣⲱⲡⲉ ⲛ̅ⲟⲩⲧⲩⲡⲟⲥ ⲛ̅ⲧⲁ[ⲩ] <text:line-break/><text:span text:style-name="T1"> </text:span><text:span text:style-name="T2">(12/20) </text:span> ⲛ̅ϭⲓ ⲛⲓϩⲟⲟⲩ ⲙⲛ̅ ⲛⲉⲩⲟⲩⲛⲟⲩ ⲙ[ⲛ̅] <text:line-break/><text:span text:style-name="T1"> </text:span><text:span text:style-name="T2">(12/21) </text:span> ⲛⲉⲩⲥⲟⲩⲥⲟⲩ· ⲛ̅ⲧⲉⲓ̈ϩⲉ ⲟⲛ ⲛ[ⲏ ⲉ]‐ <text:line-break/><text:span text:style-name="T1"> </text:span><text:span text:style-name="T2">(12/22) </text:span> ⲧⲁⲩⲟⲩⲱⲛϩ̅ ⲉⲃⲟⲗ· ⲁϥⲧⲁⲙⲓⲟ ⲛ̣[ⲁϥ] <text:line-break/><text:span text:style-name="T1"> </text:span><text:span text:style-name="T2">(12/23) </text:span> ⲛ̅ϭⲓ ⲡⲉⲩⲉⲓⲱⲧ’ ⲡⲓⲣⲉϥϫⲡⲟ ⲛ̅[ⲛⲏ] <text:line-break/><text:span text:style-name="T1"> </text:span><text:span text:style-name="T2">(12/24) </text:span> ⲧⲏⲣⲟⲩ ⲙ̅ⲙⲛ̅ⲧ’ⲥⲛⲟⲟ[ⲩⲥ ⲛ̅ⲛⲉⲱⲛ] <text:line-break/><text:span text:style-name="T1"> </text:span><text:span text:style-name="T2">(12/25) </text:span> ⲛ̅ϣⲟⲣ̣[ⲡ̅’] ⲉⲩ̣[ϣⲙ]ϣⲉ ⲙ̅ⲡⲓⲙⲛ̅ⲧⲥⲛ[ⲟⲟⲩⲥ·] <text:line-break/><text:span text:style-name="T1"> </text:span><text:span text:style-name="T2">(12/26) </text:span> [ⲛ̅ϯ]ϩⲉ ⲛⲉⲓ[ⲉⲱⲛ· ⲡ]ⲟ̣ⲩⲁ̣ ⲡⲟⲩⲁ ⲛ̅ⲛ̣[ⲏ] <text:line-break/><text:span text:style-name="T1"> </text:span><text:span text:style-name="T2">(12/27) </text:span> ⲛ̅ϯⲟ̅ⲃ̅ ⲛ̅ϭⲁⲙ̣ ⲉⲧⲁ[ⲩⲟⲩ]ⲱⲛϩ̅ ⲉ̣[ⲃⲟⲗ] <text:line-break/><text:span text:style-name="T1"> </text:span><text:span text:style-name="T2">(12/28) </text:span> [ⲛ̅ϩ]ⲏⲧ[ϥ̅· ⲟⲩⲛ̅ⲧⲁⲩ ⲛ̅ϯⲟⲩ] ⲛ̣̅ⲥⲧⲉ[ⲣⲉⲱⲙⲁ] <text:line-break/><text:span text:style-name="T1"> </text:span><text:span text:style-name="T2">(12/29) </text:span> [ϩ]ⲛ̅ ⲛⲉ[ⲩⲡⲏⲟⲩⲉ ⲧⲏⲣⲟⲩ·] ϩⲱⲥⲧ[ⲉ] <text:line-break/><text:span text:style-name="T1"> </text:span><text:span text:style-name="T2">(12/30) </text:span> ⲛ̣̅[ⲥ]ⲉ̣[ⲣ̅ ϣⲙⲛ̅ⲧ’ϣⲉⲥⲉ ⲛ̅ⲥⲧⲉⲣⲉⲱⲙⲁ...] <text:line-break/><text:span text:style-name="T1"> </text:span><text:span text:style-name="T2">(12/31) </text:span> (2+- lines lacking) <text:line-break/><text:span text:style-name="T1"> </text:span><text:span text:style-name="T2">(13/1) </text:span> [ 9+- ].[.ⲉⲧ]ⲁⲩⲣ̅ ϣⲟ‐ <text:line-break/><text:span text:style-name="T1"> </text:span><text:span text:style-name="T2">(13/2) </text:span> [ⲣⲡ̅’ ⲛ̅ϫⲟⲟⲩ· ⲛ̅ⲧⲉ]ⲣⲉⲛ[ⲓⲥⲧ]ⲉⲣⲉⲱⲙⲁ <text:line-break/><text:span text:style-name="T1"> </text:span><text:span text:style-name="T2">(13/3) </text:span> [ϫⲱⲕ ⲉⲃⲟⲗ· ⲁ]ⲩϯ ⲣ̣[ⲁⲛ] ⲉⲣⲟⲟⲩ ϫⲉ <text:line-break/><text:span text:style-name="T1"> </text:span><text:span text:style-name="T2">(13/4) </text:span> [ϯⲧ̅ⲝ̅ ⲙ̅ⲡⲏⲟⲩⲉ] ⲛ̅ⲛⲓϣ̣[ⲟⲣ]ⲡ̅’ ⲛ̅ⲛⲉⲱⲛ· <text:line-break/><text:span text:style-name="T1"> </text:span><text:span text:style-name="T2">(13/5) </text:span> [ⲛⲁⲓ̈ ⲇⲉ ⲧⲏⲣⲟⲩ ϩ]ⲉⲛⲧⲉⲗⲓⲟⲥ ⲛⲉ ⲉⲛⲁ‐ <text:line-break/><text:span text:style-name="T1"> </text:span><text:span text:style-name="T2">(13/6) </text:span> [ⲛⲟⲩⲟⲩ ⲁⲩ]ⲱ ⲛ̅ϯϩⲉ ⲁϥⲟⲩⲱⲛϩ̅ <text:line-break/><text:span text:style-name="T1"> </text:span><text:span text:style-name="T2">(13/7) </text:span> [ⲉⲃⲟⲗ ⲛ̅ϭⲓ ⲡⲉ]ϣ̣ⲧⲁ ⲛ̅ϯⲙⲛ̅ⲧ’ⲥ{ϩ̅ⲓ}ⲙⲉ· <text:line-break/><text:span text:style-name="T1"> </text:span><text:span text:style-name="T2">(13/8) </text:span> [ⲁⲩⲱ ⲡⲓϣⲟⲣ]ⲡ̅’̣ ⲛ̅ⲛⲉⲱⲛ ⲡⲁ ⲡⲓⲣⲱ‐ <text:line-break/><text:soft-page-break/><text:span text:style-name="T1"> </text:span><text:span text:style-name="T2">(13/9) </text:span> ⲙⲉ ⲛ̅[ⲛⲁⲧⲙⲟ]ⲩ ⲡⲉ· ⲡⲓⲙⲁϩⲥⲛⲁⲩ <text:line-break/><text:span text:style-name="T1"> </text:span><text:span text:style-name="T2">(13/10) </text:span> ⲡ[ⲁ ⲡϣⲏⲣⲉ ⲙ̅]ⲡⲣⲱⲙⲉ ⲡⲉ· ⲡⲏ ⲉⲧⲟⲩ‐ <text:line-break/><text:span text:style-name="T1"> </text:span><text:span text:style-name="T2">(13/11) </text:span> ⲙ̣ⲟ̣ⲩ̣[ⲧⲉ ⲉ]ⲣ̣[ⲟ]ϥ ϫⲉ ⲡϣⲟⲣⲡ̅’ ⲙ̅ⲙⲓⲥⲉ· <text:line-break/><text:span text:style-name="T1"> </text:span><text:span text:style-name="T2">(13/12) </text:span> ⲡⲓⲙⲁϩϣⲟⲙⲉⲧ’ ⲡⲁ ⲡϣⲏⲣⲉ ⲙ̅‐ <text:line-break/><text:span text:style-name="T1"> </text:span><text:span text:style-name="T2">(13/13) </text:span> ⲡϣⲏⲣⲉ ⲙ̅ⲡⲣⲱⲙⲉ ⲡⲉ· ⲡⲏ ⲉⲧⲉ <text:line-break/><text:span text:style-name="T1"> </text:span><text:span text:style-name="T2">(13/14) </text:span> ϣ̣ⲁⲩⲙⲟⲩⲧⲉ ⲉⲣⲟϥ ϫⲉ ⲡⲥⲱⲧⲏⲣ· <text:line-break/><text:span text:style-name="T1"> </text:span><text:span text:style-name="T2">(13/15) </text:span> ⲡ̣ⲏ ⲇⲉ ⲉⲧⲁⲙⲁϩⲧⲉ ⲛ̅ⲛⲁⲓ̈ ⲡⲉ ⲡⲓⲉⲱⲛ <text:line-break/><text:span text:style-name="T1"> </text:span><text:span text:style-name="T2">(13/16) </text:span> [ⲙ̅ⲡⲓ]ⲁ̣ⲧⲣ̅ ⲣ̅ⲣⲟ ⲉϩⲣⲁⲓ̈ ⲉϫⲱϥ ⲛ̅ⲧⲉ <text:line-break/><text:span text:style-name="T1"> </text:span><text:span text:style-name="T2">(13/17) </text:span> [ⲡⲛⲟⲩⲧ]ⲉ ⲛ̅ϣ̣ⲁ ⲉⲛ̣ⲉϩ ⲙⲛ̅ ⲡⲓⲁⲧⲛ̅‐ <text:line-break/><text:span text:style-name="T1"> </text:span><text:span text:style-name="T2">(13/18) </text:span> [ⲁⲣⲏϫϥ̅ ⲛ̅ⲧ]ⲉ [ⲛⲓⲉ]ⲱ̣[ⲛ ⲛ̅]ⲧ̣ⲉ ⲛ̣ⲓ̣[ⲁ]ⲧⲙⲟⲩ <text:line-break/><text:span text:style-name="T1"> </text:span><text:span text:style-name="T2">(13/19) </text:span> [ⲡⲏ ⲉⲧⲛ̅ⲧⲡⲉ ⲛ̅ⲧⲙⲁϩϣⲙⲟⲩ]ⲛ̣ⲉ <text:line-break/><text:span text:style-name="T1"> </text:span><text:span text:style-name="T2">(13/20) </text:span> [ⲉⲧⲁⲥⲟⲩⲱⲛϩ̅ ⲉⲃⲟⲗ ϩⲙ̅ ⲡⲓ]ⲭⲁⲟⲥ· <text:line-break/><text:span text:style-name="T1"> </text:span><text:span text:style-name="T2">(13/21) </text:span> [ⲡⲓⲣⲱⲙⲉ ⲇⲉ ⲛ̅ⲛⲁⲧ]ⲙⲟⲩ ⲁϥⲟⲩ‐ <text:line-break/><text:span text:style-name="T1"> </text:span><text:span text:style-name="T2">(13/22) </text:span> [ⲱⲛϩ̅ ⲉⲃⲟⲗ ⲛ̅ϩⲉⲛⲉⲱ]ⲛ ⲙ̣ⲛ̅ ϩⲉⲛ‐ <text:line-break/><text:span text:style-name="T1"> </text:span><text:span text:style-name="T2">(13/23) </text:span> [ⲙⲛ̅ⲧⲣ̅ⲣⲱⲟⲩ ⲙⲛ̅ ϩⲉ]ⲛϭⲟ̣[ⲙ·] <text:line-break/><text:span text:style-name="T1"> </text:span><text:span text:style-name="T2">(13/24) </text:span> [ⲁϥϯ ⲉⲝⲟⲩⲥⲓⲁ ⲛⲁⲩ] ⲧⲏⲣⲟⲩ <text:line-break/><text:span text:style-name="T1"> </text:span><text:span text:style-name="T2">(13/25) </text:span> [ⲉⲧⲁⲩⲟⲩⲱⲛ]ϩ̣ ⲉⲃⲟ[ⲗ] ⲛ̣̅ϩ̣ⲏⲧϥ̅ <text:line-break/><text:span text:style-name="T1"> </text:span><text:span text:style-name="T2">(13/26) </text:span> [ 16+- ]ⲁⲩ[..] <text:line-break/><text:span text:style-name="T1"> </text:span><text:span text:style-name="T2">(13/27) </text:span> [ 13+- ⲙ̅ⲡⲓ]ⲭⲁⲟ̣ⲥ̣· <text:line-break/><text:span text:style-name="T1"> </text:span><text:span text:style-name="T2">(13/28) </text:span> (5+- lines lacking) <text:line-break/><text:span text:style-name="T1"> </text:span><text:span text:style-name="T2">(14/1) </text:span> [.]..[...].[ 12+- ] <text:line-break/><text:span text:style-name="T1"> </text:span><text:span text:style-name="T2">(14/2) </text:span> [ϩ]ⲛ̅ ⲉⲟ[ⲟⲩ] ⲛ̣̅ⲛⲁ[ⲧ’ϯ ⲏⲡⲉ ⲉⲣⲟⲟⲩ·] <text:line-break/><text:span text:style-name="T1"> </text:span><text:span text:style-name="T2">(14/3) </text:span> ⲛⲏ ⲉⲧⲁ[ⲩϯ] ⲡⲉⲩⲣ[ⲁⲛ ⲉⲣⲟⲟⲩ· ⲛⲁⲓ̈] <text:line-break/><text:span text:style-name="T1"> </text:span><text:span text:style-name="T2">(14/4) </text:span> ⲛ̅ⲧⲉ ϯⲁ[ⲣⲭ]ⲏ̣ ⲙⲛ̅ [ϯⲙⲏⲧⲉ ⲙⲛ̅ ϯ]‐ <text:line-break/><text:span text:style-name="T1"> </text:span><text:span text:style-name="T2">(14/5) </text:span> ⲁⲧⲣ̅ ϩⲁⲏ [ⲉ]ⲧⲉ ⲡ[ϫⲱⲕ ⲉⲃⲟⲗ ⲡⲉ· ⲡⲉ]‐ <text:line-break/><text:span text:style-name="T1"> </text:span><text:span text:style-name="T2">(14/6) </text:span> ϩⲟⲩⲉⲓⲧ’ ⲛ̅ⲛⲉⲱ[ⲛ ⲙⲛ̅ ⲡⲓⲙⲉϩⲥⲛⲁⲩ] <text:line-break/><text:span text:style-name="T1"> </text:span><text:span text:style-name="T2">(14/7) </text:span> ⲙⲛ̅ ⲡⲓⲙⲉϩϣⲟⲙ[ⲉⲧ’· ⲡⲉϩⲟⲩⲉⲓⲧ’] <text:line-break/><text:span text:style-name="T1"> </text:span><text:span text:style-name="T2">(14/8) </text:span> ϩⲙ̅ ⲡⲁⲓ̈ ⲁⲩϯ ⲣⲁⲛ ⲉ̣[ⲣⲟϥ ϫⲉ ⲡⲓⲥⲁϩ]‐ <text:line-break/><text:span text:style-name="T1"> </text:span><text:span text:style-name="T2">(14/9) </text:span> ⲣⲉ ⲛ̅ⲧⲉ ϯⲙⲛ̅ⲧ’ⲟⲩ[ⲁ ⲙⲛ̅ ⲡⲓⲙ̅ⲧⲟⲛ· ⲟ]ⲩ̣[ⲛ̅]‐ <text:line-break/><text:span text:style-name="T1"> </text:span><text:span text:style-name="T2">(14/10) </text:span> ⲧⲉ ⲡⲟⲩⲁ ⲡⲟⲩⲁ ⲡ[ⲉϥⲣⲁⲛ·] ⲉⲧⲣⲉⲩ‐ <text:line-break/><text:span text:style-name="T1"> </text:span><text:span text:style-name="T2">(14/11) </text:span> ϯ ⲣⲁⲛ ⲇⲉ ϫⲉ ⲧⲉⲕⲕ[ⲗⲏⲥⲓⲁ ⲙ̅]ⲡ̣ⲓ‐ <text:line-break/><text:span text:style-name="T1"> </text:span><text:span text:style-name="T2">(14/12) </text:span> ⲙⲉϩϣⲟⲙⲉⲧ’ ⲛ̅ⲛⲉ[ⲱⲛ ⲉⲧ]ⲃⲉ <text:line-break/><text:span text:style-name="T1"> </text:span><text:span text:style-name="T2">(14/13) </text:span> ⲡⲁϣⲁⲓ̈ ⲉⲧⲁϥⲟⲩⲱⲛϩ̅ ⲉⲃⲟⲗ ϩⲙ̅ <text:line-break/><text:span text:style-name="T1"> </text:span><text:span text:style-name="T2">(14/14) </text:span> ⲡⲓⲟⲩⲁ· ϫⲉ ⲉⲩⲉⲥⲱⲟⲩϩ ⲧⲏⲣⲟⲩ <text:line-break/><text:span text:style-name="T1"> </text:span><text:span text:style-name="T2">(14/15) </text:span> ⲉⲩⲙⲁ ⲉϩⲣⲁⲓ̈ ⲉⲟⲩⲁ ⲛ̅ⲥⲉϯ ⲡⲉⲩ‐ <text:line-break/><text:span text:style-name="T1"> </text:span><text:span text:style-name="T2">(14/16) </text:span> ⲣⲁⲛ ϫⲉ ⲧⲉⲕ’ⲕⲗⲏⲥⲓⲁ· ⲉⲃⲟⲗ <text:line-break/><text:span text:style-name="T1"> </text:span><text:span text:style-name="T2">(14/17) </text:span> ϩⲛ̅ ϯⲉⲕⲕⲗⲏⲥⲓⲁ ⲉⲧ’ϫⲟⲥⲉ ⲉⲛ[ⲓⲡⲉ·] <text:line-break/><text:span text:style-name="T1"> </text:span><text:span text:style-name="T2">(14/18) </text:span> ⲉⲧⲁⲥⲟⲩⲱⲛϩ̅ ⲉⲃⲟⲗ ⲛ̅ϭⲓ ϯ[ⲉⲕⲕⲗⲏ]‐ <text:line-break/><text:span text:style-name="T1"> </text:span><text:span text:style-name="T2">(14/19) </text:span> ⲥⲓⲁ ⲛ̅ⲧⲉ ϯϩⲟ[ⲅ]ⲇ̣ⲟⲁⲥ· [ⲁⲩϯ ⲣⲁⲛ] <text:line-break/><text:span text:style-name="T1"> </text:span><text:span text:style-name="T2">(14/20) </text:span> ⲉⲣⲟⲥ̣· ⲉ̣ⲩ̣[ϩⲟⲟⲩⲧ’ⲥ{ϩ̅ⲓ}ⲙⲉ ⲧⲉ· ⲕⲁ]‐ <text:line-break/><text:span text:style-name="T1"> </text:span><text:span text:style-name="T2">(14/21) </text:span> ⲧⲁ ⲑ̣[ⲉ ⲛ̅ⲟⲩⲙⲉⲣⲟⲥ ⲛ̅ϩⲟⲟⲩⲧ’ ⲙⲛ̅] <text:line-break/><text:span text:style-name="T1"> </text:span><text:span text:style-name="T2">(14/22) </text:span> ⲟⲩⲙⲉ̣ⲣ[ⲟⲥ ⲛ̅ⲥ{ϩ̅ⲓ}ⲙⲉ· ⲡⲓⲙⲉⲣⲟⲥ ⲛ̅ϩⲟ]‐ <text:line-break/><text:span text:style-name="T1"> </text:span><text:span text:style-name="T2">(14/23) </text:span> ⲟⲩⲧ ⲁⲩϯ [ⲣⲁⲛ ⲉⲣⲟϥ ϫⲉ ⲧⲉⲕ]‐ <text:line-break/><text:span text:style-name="T1"> </text:span><text:span text:style-name="T2">(14/24) </text:span> ⲕⲗⲏⲥⲓⲁ· [ⲡⲓⲙⲉⲣⲟⲥ ⲇⲉ ⲛ̅ⲥ{ϩ̅ⲓ}ⲙⲉ] <text:line-break/><text:span text:style-name="T1"> </text:span><text:span text:style-name="T2">(14/25) </text:span> ϫⲉ̣ [ⲍⲱⲏ ϫⲉ ⲉⲥⲛⲁⲟⲩⲱⲛϩ̅ ⲉⲃⲟⲗ ϫⲉ] <text:line-break/><text:span text:style-name="T1"> </text:span><text:span text:style-name="T2">(14/26) </text:span> ⲁ̣ⲡⲱⲛϩ̅ ϣ[ⲱ]ⲡ̣ⲉ̣ [ⲉⲃⲟⲗ ϩⲛ̅ⲛ ⲟⲩ]‐ <text:line-break/><text:span text:style-name="T1"> </text:span><text:span text:style-name="T2">(14/27) </text:span> [ⲥ{ϩ̅ⲓ}]ⲙⲉ ⲛ̅[ⲛⲏ] ⲧⲏ̣ⲣ̣[ⲟⲩ· ⲛⲓⲣⲁⲛ ⲇⲉ] <text:line-break/><text:soft-page-break/><text:span text:style-name="T1"> </text:span><text:span text:style-name="T2">(14/28) </text:span> ⲧ̣ⲏ̣ⲣⲟⲩ̣[ 16+- ] <text:line-break/><text:span text:style-name="T1"> </text:span><text:span text:style-name="T2">(14/29) </text:span> ⲙⲉ ⲛ̅ⲛ[ 17+- ] <text:line-break/><text:span text:style-name="T1"> </text:span><text:span text:style-name="T2">(14/30) </text:span> (3+- lines lacking) <text:line-break/><text:span text:style-name="T1"> </text:span><text:span text:style-name="T2">(15/1) </text:span> (line 1 lacking) <text:line-break/><text:span text:style-name="T1"> </text:span><text:span text:style-name="T2">(15/2) </text:span> [.....ⲛ̅ϩⲉⲛⲛⲟ]ⲩ̣ⲧ̣[ⲉ ⲛ̅]ⲧ̣ⲉ ⲛⲓⲛ̣[ⲟⲩ]‐ <text:line-break/><text:span text:style-name="T1"> </text:span><text:span text:style-name="T2">(15/3) </text:span> [ⲧⲉ· ⲛⲓⲛⲟⲩⲧⲉ ⲇⲉ ⲛ̅]ⲧ̣ⲉ ⲛ[ⲓⲛⲟⲩ]ⲧⲉ ⲁ[ⲩ]‐ <text:line-break/><text:span text:style-name="T1"> </text:span><text:span text:style-name="T2">(15/4) </text:span> [ⲟⲩⲱⲛϩ̅ ⲉⲃⲟⲗ] {ϩ̅}ⲛ̅ϩⲉ[ⲛⲛ]ⲟ̣ⲩⲧⲉ ϩⲛ̅ <text:line-break/><text:span text:style-name="T1"> </text:span><text:span text:style-name="T2">(15/5) </text:span> [ⲛⲉⲩⲙⲛ̅ⲧⲥⲁⲃⲉ·] ⲛⲓⲛ[ⲟ]ⲩ̣ⲧⲉ ⲇⲉ <text:line-break/><text:span text:style-name="T1"> </text:span><text:span text:style-name="T2">(15/6) </text:span> [ⲁⲩⲟⲩⲱⲛϩ̅ ⲉⲃⲟ]ⲗ ϩⲛ̅ ⲛ̣ⲉⲩⲥⲃⲱ· <text:line-break/><text:span text:style-name="T1"> </text:span><text:span text:style-name="T2">(15/7) </text:span> [ⲛ̅ϩⲉⲛϫⲟⲉⲓⲥ ⲛ̅]ⲧ̣ⲉ ϩⲉⲛϫⲟⲉⲓⲥ· ⲛⲓϫⲟ‐ <text:line-break/><text:span text:style-name="T1"> </text:span><text:span text:style-name="T2">(15/8) </text:span> [ⲉⲓⲥ ⲇⲉ ⲛ̅ⲛ]ⲓϫⲟⲉⲓⲥ ⲁⲩⲟⲩⲱⲛϩ̅ <text:line-break/><text:span text:style-name="T1"> </text:span><text:span text:style-name="T2">(15/9) </text:span> [ⲉⲃⲟⲗ ϩⲛ̅ ⲛⲉ]ⲩ̣ϣⲟϫⲛⲉ ⲛ̅ϩⲉⲛϫⲟ‐ <text:line-break/><text:span text:style-name="T1"> </text:span><text:span text:style-name="T2">(15/10) </text:span> [ⲉⲓⲥ· ⲁⲛⲓϫⲟⲉⲓ]ⲥ ⲇⲉ ⲟⲩⲱⲛϩ̅ ⲉⲃⲟⲗ <text:line-break/><text:span text:style-name="T1"> </text:span><text:span text:style-name="T2">(15/11) </text:span> ϩⲛ̅ [ⲛⲉⲩϭⲟⲙ] ⲛ̅ϩⲉⲛⲁⲣⲭⲓⲁⲅ’ⲅⲉⲗⲟⲥ· <text:line-break/><text:span text:style-name="T1"> </text:span><text:span text:style-name="T2">(15/12) </text:span> ⲛ[ⲓⲁⲣⲭⲓⲁⲅ’ⲅ]ⲉⲗⲟⲥ ⲇⲉ ⲁⲩⲟⲩⲱⲛϩ̅ <text:line-break/><text:span text:style-name="T1"> </text:span><text:span text:style-name="T2">(15/13) </text:span> ⲉⲃⲟⲗ ϩ̣ⲛ̣̅ ⲛⲉ̣ⲩϣⲁϫⲉ ⲛ̅ϩⲉⲛⲁⲅ’ⲅⲉ‐ <text:line-break/><text:span text:style-name="T1"> </text:span><text:span text:style-name="T2">(15/14) </text:span> ⲗⲟⲥ· ⲁⲩⲱ ⲉⲃⲟⲗ ϩⲛ̅ ⲛⲁⲓ̈ ⲁⲩⲟⲩ‐ <text:line-break/><text:span text:style-name="T1"> </text:span><text:span text:style-name="T2">(15/15) </text:span> ⲱⲛϩ̅ ⲉⲃⲟⲗ ⲛ̅ϭⲓ ϩⲉⲛⲉⲓⲇⲟⲥ ⲙⲛ̅ <text:line-break/><text:span text:style-name="T1"> </text:span><text:span text:style-name="T2">(15/16) </text:span> ϩⲉⲛⲥⲭⲏⲙⲁ ⲙⲛ̅ ϩⲉⲛⲙⲟⲣ̅ⲫⲏ <text:line-break/><text:span text:style-name="T1"> </text:span><text:span text:style-name="T2">(15/17) </text:span> ⲙ̣ⲛ̣̅ ⲛⲓⲉⲱⲛ ⲧⲏⲣⲟⲩ ⲙⲛ̅ ⲛⲉⲩⲕⲟⲥ‐ <text:line-break/><text:span text:style-name="T1"> </text:span><text:span text:style-name="T2">(15/18) </text:span> [ⲙⲟⲥ·] ⲟⲩ̣ⲛ̣̅ⲧ̣[ⲉ] ⲛ̣ⲓⲁⲧⲙⲟⲩ ⲧⲏⲣⲟⲩ <text:line-break/><text:span text:style-name="T1"> </text:span><text:span text:style-name="T2">(15/19) </text:span> [ⲛ̅ⲧⲉⲝⲟⲩⲥⲓⲁ ⲉⲃⲟⲗ ϩⲛ̅ ϯϭ]ⲟ̣ⲙ̣ ⲙ̅ⲡⲓ‐ <text:line-break/><text:span text:style-name="T1"> </text:span><text:span text:style-name="T2">(15/20) </text:span> [ⲣⲱⲙⲉ ⲛ̅ⲛⲁⲧⲙⲟⲩ ⲉϯ ⲣⲁⲛ] ⲉ̣ⲣⲟⲟⲩ· <text:line-break/><text:span text:style-name="T1"> </text:span><text:span text:style-name="T2">(15/21) </text:span> [ⲧⲥⲟⲫⲓⲁ ⲁⲩϯ ⲣⲁⲛ ⲉⲣⲟⲥ ϫⲉ] ⲧⲥⲓⲅⲏ <text:line-break/><text:span text:style-name="T1"> </text:span><text:span text:style-name="T2">(15/22) </text:span> [ϫⲉ ⲁⲥϫⲱⲕ ⲛ̅ⲧⲉⲥⲙⲛ̅ⲧⲛⲁ]ϭ ⲧⲏⲣⲥ̅ <text:line-break/><text:span text:style-name="T1"> </text:span><text:span text:style-name="T2">(15/23) </text:span> [ϩⲛ̅ ⲟⲩⲉⲛⲑⲩⲙⲏⲥⲓⲥ ⲁϫⲛ̅] ϣⲁϫⲉ <text:line-break/><text:span text:style-name="T1"> </text:span><text:span text:style-name="T2">(15/24) </text:span> [ 19+- ]ⲁⲩ <text:line-break/><text:span text:style-name="T1"> </text:span><text:span text:style-name="T2">(15/25) </text:span> (8+- lines lacking) <text:line-break/><text:span text:style-name="T1"> </text:span><text:span text:style-name="T2">(16/1) </text:span> [ 12+- ⲉⲟⲟⲩ ⲛ̅ⲛⲁⲧ’]‐ <text:line-break/><text:span text:style-name="T1"> </text:span><text:span text:style-name="T2">(16/2) </text:span> [ϣ]ⲁϫⲉ [ⲙ̅ⲙ]ⲟⲟ[ⲩ· ⲛⲏ ⲉⲧⲉ ⲙ̅ⲡⲟⲩ]‐ <text:line-break/><text:span text:style-name="T1"> </text:span><text:span text:style-name="T2">(16/3) </text:span> [ⲥ]ⲱⲧⲙ̣̅ [ⲉⲣ]ⲟⲟⲩ [ⲛ̅ϣⲁ ⲉⲛⲉϩ· ϩⲱⲥ] <text:line-break/><text:span text:style-name="T1"> </text:span><text:span text:style-name="T2">(16/4) </text:span> ⲛⲉⲩϣ [ϫⲟ]ⲟⲩ ⲛ̅[ⲛⲓⲫⲩⲥⲓⲥ ⲧⲏⲣⲟⲩ·] <text:line-break/><text:span text:style-name="T1"> </text:span><text:span text:style-name="T2">(16/5) </text:span> ⲁⲩⲧⲁⲙⲓ̣ⲟ̣ ⲇⲉ ⲛ[ⲁⲩ ⲛ̅ϩⲉⲛⲥⲧⲣⲁⲧⲓⲁ] <text:line-break/><text:span text:style-name="T1"> </text:span><text:span text:style-name="T2">(16/6) </text:span> ⲛ̅ⲧⲉ ϩⲉⲛⲁⲣⲭⲓⲁⲅ’̣[ⲅⲉⲗⲟⲥ ⲙⲛ̅ ϩⲉⲛ]‐ <text:line-break/><text:span text:style-name="T1"> </text:span><text:span text:style-name="T2">(16/7) </text:span> ⲁⲅ’ⲅⲉⲗⲟⲥ ⲛ̅ⲧⲉ ϩⲉⲛⲧ̣[ⲃⲁ ⲛ̅ⲛⲁⲧ’ϯ] <text:line-break/><text:span text:style-name="T1"> </text:span><text:span text:style-name="T2">(16/8) </text:span> ⲏⲡⲉ ⲉⲣⲟⲟⲩ ⲉⲩ[ϣⲙ̅ϣⲉ ⲙⲛ̅ ⲟⲩ]‐ <text:line-break/><text:span text:style-name="T1"> </text:span><text:span text:style-name="T2">(16/9) </text:span> ⲉⲟⲟⲩ ⲙⲛ̅ ϩⲉⲛⲡⲁ[ⲣⲑⲉⲛⲟⲥ ⲙⲛ̅] <text:line-break/><text:span text:style-name="T1"> </text:span><text:span text:style-name="T2">(16/10) </text:span> ϩⲉⲛⲡ̅ⲛ̅ⲁ̅· ⲉⲩⲉ ⲛ̅ⲟ̣[ⲩⲟⲉⲓⲛ] ⲛ̣̅ⲛⲁⲧ’‐ <text:line-break/><text:span text:style-name="T1"> </text:span><text:span text:style-name="T2">(16/11) </text:span> ϣⲁϫⲉ ⲙ̅ⲙⲟⲟⲩ· ⲙ̣[ⲛ̅ⲧⲟⲩ {ϩ̅ⲓ}ⲥ]ⲉ <text:line-break/><text:span text:style-name="T1"> </text:span><text:span text:style-name="T2">(16/12) </text:span> ⲅⲁⲣ ϩⲁⲧⲟⲟⲧⲟⲩ· ⲟⲩ[ⲧ]ⲉ̣ [ⲟⲩ]ⲙⲛ̅ⲧ’‐ <text:line-break/><text:span text:style-name="T1"> </text:span><text:span text:style-name="T2">(16/13) </text:span> ⲁⲧ’ϭⲟⲙ· ⲁⲗⲗⲁ ⲟⲩⲱϣ ⲟⲩⲁⲉⲧϥ̅ <text:line-break/><text:span text:style-name="T1"> </text:span><text:span text:style-name="T2">(16/14) </text:span> ⲡⲉ· ⲁⲩⲱ ϣⲁϥϣⲱⲡⲉ ⲛ̅ⲧⲉⲩⲛⲟⲩ· <text:line-break/><text:span text:style-name="T1"> </text:span><text:span text:style-name="T2">(16/15) </text:span> ⲁⲩⲱ ⲛ̅ⲧⲉⲓ̈ϩⲉ ⲁϥϫⲱⲕ ⲉⲃⲟⲗ ⲛ̅ϭ̣[ⲓ] <text:line-break/><text:span text:style-name="T1"> </text:span><text:span text:style-name="T2">(16/16) </text:span> ⲡⲉⲱⲛ ⲙⲛ̅ ⲧⲡⲉ ⲙⲛ̅ ⲡⲓⲥⲧⲉⲣⲉⲱ̣‐ <text:line-break/><text:span text:style-name="T1"> </text:span><text:span text:style-name="T2">(16/17) </text:span> ⲙⲁ ⲛ̅ⲧⲉ ⲡⲣⲱⲙⲉ ⲛ̅ⲛⲁⲧⲙⲟⲩ [ⲙⲛ̅] <text:line-break/><text:span text:style-name="T1"> </text:span><text:span text:style-name="T2">(16/18) </text:span> ⲧⲉϥⲥⲟⲫⲓⲁ ⲉⲧ[ⲉ ⲟⲩⲛ̅ⲧⲁϥ ⲛ̅ϩⲏ]‐ <text:line-break/><text:span text:style-name="T1"> </text:span><text:span text:style-name="T2">(16/19) </text:span> ⲧϥ̅ ⲛ̅ⲧ̣[ⲉ]ⲥ̣[ⲙⲟⲧ’ ⲛ̅ⲉⲱⲛ ⲛⲓⲙ ⲙⲛ̅ ⲕⲟ]‐ <text:line-break/><text:soft-page-break/><text:span text:style-name="T1"> </text:span><text:span text:style-name="T2">(16/20) </text:span> ⲥⲙ[ⲟⲥ ⲛⲓⲙ ⲙⲛ̅ ⲛⲏ ⲉⲧⲁⲩϣⲱⲡⲉ] <text:line-break/><text:span text:style-name="T1"> </text:span><text:span text:style-name="T2">(16/21) </text:span> ⲛ̅ⲥⲱ̣[ⲟⲩ ⲉⲧⲣⲉⲩⲧⲥⲁⲛⲟ ⲛ̅ⲛⲓⲧⲩ]‐ <text:line-break/><text:span text:style-name="T1"> </text:span><text:span text:style-name="T2">(16/22) </text:span> ⲡⲟⲥ ⲉⲃⲟ̣[ⲗ ϩⲙ̅ ⲡⲙⲁ ⲉⲧⲙ̅ⲙⲁⲩ] <text:line-break/><text:span text:style-name="T1"> </text:span><text:span text:style-name="T2">(16/23) </text:span> ϩⲛ̅ ⲙ̅ⲡ[ⲏⲟⲩⲉ ⲙ̅ⲡⲓⲭⲁⲟⲥ ⲙⲛ̅ ⲛⲉⲩ]‐ <text:line-break/><text:span text:style-name="T1"> </text:span><text:span text:style-name="T2">(16/24) </text:span> [ⲕ]ⲟⲥⲙ[ⲟⲥ· ⲁⲩⲱ ⲧⲉⲫⲩⲥⲓⲥ 5+-] <text:line-break/><text:span text:style-name="T1"> </text:span><text:span text:style-name="T2">(16/25) </text:span> [ⲧ]ⲏⲣ̣[ⲥ̅ 17+- ] <text:line-break/><text:span text:style-name="T1"> </text:span><text:span text:style-name="T2">(16/26) </text:span> [ 21+- ] <text:line-break/><text:span text:style-name="T1"> </text:span><text:span text:style-name="T2">(16/27) </text:span> [ 21+- ] <text:line-break/><text:span text:style-name="T1"> </text:span><text:span text:style-name="T2">(16/28) </text:span> [ 21+- ] <text:line-break/><text:span text:style-name="T1"> </text:span><text:span text:style-name="T2">(16/29) </text:span> [ 21+- ] <text:line-break/><text:span text:style-name="T1"> </text:span><text:span text:style-name="T2">(16/30) </text:span> [ 21+- ] <text:line-break/><text:span text:style-name="T1"> </text:span><text:span text:style-name="T2">(16/31) </text:span> [ 8+- ⲉⲩⲣⲁϣⲉ ⲉⲩⲙⲏⲛ] <text:line-break/><text:span text:style-name="T1"> </text:span><text:span text:style-name="T2">(17/1) </text:span> [ϩⲙ̅ ⲡⲉⲩⲉⲟⲟⲩ· ⲛ̅ⲛⲁⲧ]ϣⲓⲃ̣[ⲉ] <text:line-break/><text:span text:style-name="T1"> </text:span><text:span text:style-name="T2">(17/2) </text:span> [ⲙⲛ̅ ⲡⲓⲙ̅ⲧⲟⲛ ⲛ̅ⲛ]ⲁⲧ’̣[ϯ ϣ]ⲓ̣ ⲉⲣⲟ[ϥ·] <text:line-break/><text:span text:style-name="T1"> </text:span><text:span text:style-name="T2">(17/3) </text:span> [ⲛⲏ ⲉⲧⲉ ⲙⲛ̅ ϣ]ϭ̣ⲟⲙ ⲛ̣̅[ⲟⲩϣⲁϫⲉ̣ <text:line-break/><text:span text:style-name="T1"> </text:span><text:span text:style-name="T2">(17/4) </text:span> [ⲉϫⲱ ⲙ̅ⲙⲟⲟⲩ]· ⲛ̅ⲥⲉ̣[ⲥⲟ]ⲩⲱⲛⲟⲩ <text:line-break/><text:span text:style-name="T1"> </text:span><text:span text:style-name="T2">(17/5) </text:span> [ϩⲛ̅ ⲛⲓⲉⲱⲛ ⲧⲏⲣ]ⲟⲩ ⲉⲧⲁⲩϣⲱⲡⲉ <text:line-break/><text:span text:style-name="T1"> </text:span><text:span text:style-name="T2">(17/6) </text:span> [ⲙⲛ̅ⲛ̅ⲥⲁ] ⲛ̣[ⲁⲓ̈] ⲙⲛ̅ ⲛⲉⲩϭⲟⲙ· <text:line-break/><text:span text:style-name="T1"> </text:span><text:span text:style-name="T2">(17/7) </text:span> [ 7+- ] ϩ̣ⲱ ⲉⲣⲱⲧⲛ̅ ϣⲁ ⲡⲉⲓ̈ⲙⲁ <text:line-break/><text:span text:style-name="T1"> </text:span><text:span text:style-name="T2">(17/8) </text:span> [ⲛⲏ ⲇⲉ ⲧⲏ]ⲣ̣ⲟ̣[ⲩ] ⲉ̣ⲧⲁⲩⲣ̅ ϣⲟⲣⲡ̅’ <text:line-break/><text:span text:style-name="T1"> </text:span><text:span text:style-name="T2">(17/9) </text:span> ⲛ̣̅[ϫⲟⲟⲩ ⲛⲏⲧ]ⲛ̅· ⲁⲓ̈ϣⲁϫⲉ ⲙ̅ⲙⲟⲟⲩ <text:line-break/><text:span text:style-name="T1"> </text:span><text:span text:style-name="T2">(17/10) </text:span> ⲛ̅ⲑ̣[ⲉ ⲉⲛⲉⲩ]ⲛ̅ ϭⲟⲙ ⲛ̅ⲧⲉⲧⲛ̅ϣⲟⲡⲟⲩ <text:line-break/><text:span text:style-name="T1"> </text:span><text:span text:style-name="T2">(17/11) </text:span> ⲉ[ⲣⲱⲧⲛ̅ ⲧⲏ]ⲣ̣ⲟⲩ ϣⲁⲛⲧⲉⲡⲓϣⲁϫⲉ <text:line-break/><text:span text:style-name="T1"> </text:span><text:span text:style-name="T2">(17/12) </text:span> ⲛ̅ⲛⲁ[ⲧ’ϯ̣ ⲥ]ⲃⲱ ⲛⲁϥ ϣⲁⲛⲧⲉϥⲡⲣ̅ⲣⲉ <text:line-break/><text:span text:style-name="T1"> </text:span><text:span text:style-name="T2">(17/13) </text:span> ⲉⲃⲟⲗ ϩⲛ̅ ⲧⲏⲩⲧⲛ̅· ⲁⲩⲱ ϥⲛⲁ‐ <text:line-break/><text:span text:style-name="T1"> </text:span><text:span text:style-name="T2">(17/14) </text:span> ⲃⲱⲗ ⲛⲏⲧⲛ̅ ⲛ̅ⲛⲁⲓ̈ ϩⲛ̅ ⲟⲩⲅⲛⲱⲥⲓⲥ· <text:line-break/><text:span text:style-name="T1"> </text:span><text:span text:style-name="T2">(17/15) </text:span> ⲛ̅ⲛⲟⲩⲧⲉ ⲉⲥⲧⲃ̅ⲃⲏⲟⲩⲧ’· ⲟⲩⲟⲛ <text:line-break/><text:span text:style-name="T1"> </text:span><text:span text:style-name="T2">(17/16) </text:span> ⲅⲁⲣ ⲛⲓⲙ ⲉⲧⲉ ⲟⲩⲛ̅ⲧⲁϥ ⲥⲉⲛⲉⲟⲩ‐ <text:line-break/><text:span text:style-name="T1"> </text:span><text:span text:style-name="T2">(17/17) </text:span> ⲱ̣ϩ [ⲙ̅ⲡⲁⲓ̈] ⲛ̣̅ϩ̣ⲟⲩⲟ· <text:line-break/><text:span text:style-name="T1"> </text:span><text:span text:style-name="T2">(17/18) </text:span> [ⲉⲩⲅⲟⲥⲧ]ⲟ̣[ⲥ] </text:p>
      <text:p text:style-name="P1"/>
      <text:p text:style-name="P3">( codex V ) The Apocalypse of Paul</text:p>
      <text:p text:style-name="P2"><text:span text:style-name="T1"> </text:span><text:span text:style-name="T2">(17/19) </text:span> [ ⲧⲁⲡⲟⲕⲁⲗⲩⲯⲓⲥ ⲙ̅ⲡⲁⲩ]ⲗⲟⲥ <text:line-break/><text:span text:style-name="T1"> </text:span><text:span text:style-name="T2">(17/20) </text:span> [ 10+- ]ⲩ.[..]ⲛ̅ϭⲓ ⲡ̣[ <text:line-break/><text:span text:style-name="T1"> </text:span><text:span text:style-name="T2">(17/21) </text:span> [ 14+- ] ⲉⲩ̣[ <text:line-break/><text:span text:style-name="T1"> </text:span><text:span text:style-name="T2">(17/22) </text:span> (4 lines lacking) <text:line-break/><text:span text:style-name="T1"> </text:span><text:span text:style-name="T2">(18/1) </text:span> (line 1 lacking) <text:line-break/><text:span text:style-name="T1"> </text:span><text:span text:style-name="T2">(18/2) </text:span> [.]ϣⲉ̣ ⲇⲉ̣ [...]ⲛ ⲁ[ <text:line-break/><text:span text:style-name="T1"> </text:span><text:span text:style-name="T2">(18/3) </text:span> [ⲛ̅]ⲧⲉ{ϩ̅ⲓ}ⲏ [ⲁ]ⲩⲱ [ⲁϥⲟⲩⲱϣⲃ̅ ⲛⲁϥ] <text:line-break/><text:span text:style-name="T1"> </text:span><text:span text:style-name="T2">(18/4) </text:span> [ⲉ]ϥϫⲱ ⲙ̅ⲙⲟⲥ ϫⲉ̣ [ⲉⲓ̈ⲛⲁⲃⲱⲕ ϩⲛ̅ ⲁϣ] <text:line-break/><text:span text:style-name="T1"> </text:span><text:span text:style-name="T2">(18/5) </text:span> ⲛ̅{ϩ̅ⲓ} ⲉϩⲣⲁⲓ̈ ⲉⲑⲓ̣̅ⲏ̣[ⲙ̅· ⲁϥⲟⲩⲱϣⲃ̅] <text:line-break/><text:span text:style-name="T1"> </text:span><text:span text:style-name="T2">(18/6) </text:span> ⲛ̅ϭⲓ ⲡⲕⲟⲩⲉⲓ ϣⲏ[ⲙ ⲉϥϫⲱ ⲙ̅ⲙⲟⲥ] <text:line-break/><text:span text:style-name="T1"> </text:span><text:span text:style-name="T2">(18/7) </text:span> ϫⲉ ⲁϫⲓ ⲡⲉⲕⲣⲁⲛ ϫⲉⲕ̣[ⲁⲁⲥ ⲉⲓ̈ⲉⲧⲁⲙⲟ ⲙ̅]‐ <text:line-break/><text:span text:style-name="T1"> </text:span><text:span text:style-name="T2">(18/8) </text:span> ⲙⲟⲕ ⲉⲧⲉ{ϩ̅ⲓ}ⲏ· ⲛⲉⲣ[ⲉⲡⲕⲟⲩⲉⲓ ϣⲏⲙ] <text:line-break/><text:span text:style-name="T1"> </text:span><text:span text:style-name="T2">(18/9) </text:span> ⲛⲉϥⲥⲟⲟⲩⲛ ⲙ̅ⲡⲁ[ⲩⲗⲟⲥ ϫⲉ ⲛⲓ]ⲙ̣ [ⲡⲉ] <text:line-break/><text:span text:style-name="T1"> </text:span><text:span text:style-name="T2">(18/10) </text:span> ⲁϥⲟⲩⲱϣ ⲉⲣ̅ ϣⲃⲏ[ⲣ ⲛ̅ϣⲁ]ϫ̣ⲉ ⲛⲙ̅‐ <text:line-break/><text:span text:style-name="T1"> </text:span><text:span text:style-name="T2">(18/11) </text:span> ⲙⲁϥ ϩⲛ̅ ⲛⲉϥϣⲁϫⲉ {ϩ̣̅̅[̅ⲓ}ⲛⲁ ϫ]ⲉ̣ ⲉϥ‐ <text:line-break/><text:span text:style-name="T1"> </text:span><text:span text:style-name="T2">(18/12) </text:span> ⲛⲁϭⲓⲛⲉ ⲛ̅ⲛⲟⲩⲗⲁⲉ[ⲓϭⲉ] ⲛ̣̅ϣⲁϫⲉ <text:line-break/><text:span text:style-name="T1"> </text:span><text:span text:style-name="T2">(18/13) </text:span> ⲛⲙ̅ⲙⲁϥ· ⲁϥⲟⲩⲱϣⲃ̅ ⲛ̅ϭⲓ ⲡⲕⲟⲩⲉⲓ <text:line-break/><text:span text:style-name="T1"> </text:span><text:span text:style-name="T2">(18/14) </text:span> ϣⲏⲙ ⲉϥϫⲱ ⲙ̅ⲙⲟⲥ ϫⲉ ϯⲥⲟⲟⲩⲛ <text:line-break/><text:span text:style-name="T1"> </text:span><text:span text:style-name="T2">(18/15) </text:span> ⲙ̅ⲙⲟⲕ ⲡⲁⲩⲗⲟⲥ ϫⲉ ⲛ̅ⲧⲕ̅ ⲛⲓⲙ· ϫⲉ <text:line-break/><text:span text:style-name="T1"> </text:span><text:span text:style-name="T2">(18/16) </text:span> ⲛ̅ⲧⲟⲕ ⲡⲉ ⲛ̅ⲧⲁⲩⲥⲙⲟⲩ ⲉⲣⲟⲕ ϫⲓⲛ <text:line-break/><text:span text:style-name="T1"> </text:span><text:span text:style-name="T2">(18/17) </text:span> ϩⲛ̅ ⲑⲏ ⲛ̅ⲧⲉϥⲙⲁⲁⲩ· ⲉⲡⲓⲇⲏ ⲁⲓ̈[{ⲉ̅ⲓ}] <text:line-break/><text:span text:style-name="T1"> </text:span><text:span text:style-name="T2">(18/18) </text:span> ⲉⲣⲟⲕ ϫⲉ ⲉⲕⲛⲁ̣[ⲃⲱⲕ ⲉϩⲣⲁ]ⲓ̣̈ [ⲉⲑ]ⲓ̣̅̅[̅ⲏ̅ⲙ̅]̅ <text:line-break/><text:span text:style-name="T1"> </text:span><text:span text:style-name="T2">(18/19) </text:span> ϣⲁ ⲛⲉⲕϣⲃⲏ̣[ⲣ ⲁⲡⲟⲥⲧⲟⲗⲟⲥ ⲁⲩⲱ] <text:line-break/><text:span text:style-name="T1"> </text:span><text:span text:style-name="T2">(18/20) </text:span> ⲉⲧ[ⲃⲉ] ⲡⲁⲓ̈ ⲁⲩ̣[ⲙⲟⲩⲧⲉ ⲉⲣⲟⲕ ⲁⲩⲱ] <text:line-break/><text:span text:style-name="T1"> </text:span><text:span text:style-name="T2">(18/21) </text:span> ⲁⲛⲟⲕ ⲡⲉ ⲡⲉⲡ̣̅̅[̅ⲛ̅ⲁ̅ ⲉⲧⲙⲟⲟϣⲉ ⲛⲙ̅]‐ <text:line-break/><text:span text:style-name="T1"> </text:span><text:span text:style-name="T2">(18/22) </text:span> ⲙ̣ⲁⲕ· ⲙⲁⲧⲟⲩ[ⲛⲟⲥ ⲡⲉⲕⲛⲟⲩⲥ] <text:line-break/><text:span text:style-name="T1"> </text:span><text:span text:style-name="T2">(18/23) </text:span> [ⲡⲁ]ⲩⲗ̣[ⲟⲥ] ⲙⲛ̅[ <text:line-break/><text:span text:style-name="T1"> </text:span><text:span text:style-name="T2">(18/24) </text:span> (6+- lines lacking) <text:line-break/><text:span text:style-name="T1"> </text:span><text:span text:style-name="T2">(19/1) </text:span> ⲅⲁⲣ[ 11+- ] ⲉⲃ[ <text:line-break/><text:span text:style-name="T1"> </text:span><text:span text:style-name="T2">(19/2) </text:span> ⲙⲟ[....].[....].[..ⲧⲏ]ⲣϥ̅ ⲉⲧ’.[ <text:line-break/><text:span text:style-name="T1"> </text:span><text:span text:style-name="T2">(19/3) </text:span> ϩⲛ̅ ⲛ[ⲁⲣ]ⲭⲏ̣ [ⲙⲛ̅ ⲛ]ⲉⲉⲓⲉⲝⲟⲩⲥⲓⲁ [ⲙⲛ̅] <text:line-break/><text:span text:style-name="T1"> </text:span><text:span text:style-name="T2">(19/4) </text:span> ϩ̣ⲉⲛⲁ̣ⲣⲭ̣ⲁ̣[ⲅ’ⲅ]ⲉⲗⲟⲥ· ⲙⲛ̅ ϩⲉⲛϭⲟ̣ⲙ <text:line-break/><text:span text:style-name="T1"> </text:span><text:span text:style-name="T2">(19/5) </text:span> ⲙⲛ̅ ⲡⲅ̣ⲉ̣[ⲛ]ⲟ̣ⲥ̣ ⲧⲏⲣϥ̅ ⲛ̅ⲧⲉ ⲛⲓⲇⲁⲓ‐ <text:line-break/><text:span text:style-name="T1"> </text:span><text:span text:style-name="T2">(19/6) </text:span> ⲙⲱⲛ[·...].ⲉ ⲡⲏ ⲉⲧ’ϭⲱⲗⲡ̅’ ⲛ̅‐ <text:line-break/><text:span text:style-name="T1"> </text:span><text:span text:style-name="T2">(19/7) </text:span> ϩⲉⲛⲥⲱⲙⲁ ⲉⲩϭⲣⲁϭ ⲙ̅ⲯⲩⲭⲏ· <text:line-break/><text:span text:style-name="T1"> </text:span><text:span text:style-name="T2">(19/8) </text:span> ⲁⲩⲱ̣ ⲙⲛ̅ⲛ̅ⲥⲁ ⲧⲉϥϫⲱⲕ ⲙ̅ⲡⲓϣⲁ‐ <text:line-break/><text:span text:style-name="T1"> </text:span><text:span text:style-name="T2">(19/9) </text:span> ϫⲉ ⲉⲃⲟⲗ ⲁϥⲟⲩⲱϣⲃ̅ ⲉϥϫⲱ ⲙ̅ⲙⲟⲥ <text:line-break/><text:span text:style-name="T1"> </text:span><text:span text:style-name="T2">(19/10) </text:span> ⲛⲁⲓ̈ ϫⲉ ⲙⲁⲧⲟⲩⲛⲟⲥ ⲡⲉⲕⲛⲟⲩⲥ <text:line-break/><text:span text:style-name="T1"> </text:span><text:span text:style-name="T2">(19/11) </text:span> ⲡⲁ[ⲩⲗ]ⲟⲥ· ⲁⲩⲱ ⲉⲛⲁⲩ ϫⲉ ⲡⲓⲧⲟⲟⲩ <text:line-break/><text:span text:style-name="T1"> </text:span><text:span text:style-name="T2">(19/12) </text:span> ⲉⲧⲉⲕϩⲱⲙ ⲉϫⲱϥ ⲛ̅ⲧⲟϥ ⲡⲉ ⲡⲧⲟⲟⲩ <text:line-break/><text:span text:style-name="T1"> </text:span><text:span text:style-name="T2">(19/13) </text:span> ⲛ̅{ϩ̅ⲓ}ⲉⲣⲓⲭⲱ· ϫⲉ ⲉⲕⲉⲥⲟⲩⲱⲛ ⲛⲉⲧ’‐ <text:line-break/><text:span text:style-name="T1"> </text:span><text:span text:style-name="T2">(19/14) </text:span> ϩⲏⲡ’ ⲉϩⲣⲁⲓ̈ ϩⲛ̅ ⲛⲉⲧ’ⲟⲩⲟⲛϩ̅ ⲉⲃⲟⲗ <text:line-break/><text:span text:style-name="T1"> </text:span><text:span text:style-name="T2">(19/15) </text:span> ⲡⲓⲙⲛ̅ⲧ’ⲥⲛⲟⲟⲩⲥ ⲇⲉ ⲛ̅ⲛⲁⲡⲟⲥⲧⲟⲗⲟⲥ <text:line-break/><text:span text:style-name="T1"> </text:span><text:span text:style-name="T2">(19/16) </text:span> ⲉⲧⲉⲕⲛⲁⲃⲱⲕ ϣⲁⲣⲟⲟⲩ· ϩⲉⲛⲡ̅ⲛ̅ⲁ̅ <text:line-break/><text:span text:style-name="T1"> </text:span><text:span text:style-name="T2">(19/17) </text:span> ⲅⲁⲣ ⲉⲩⲥⲟⲧⲡ̅’ ⲛⲉ· ⲁⲩⲱ ⲉⲩⲛⲁⲣ̅‐ <text:line-break/><text:span text:style-name="T1"> </text:span><text:span text:style-name="T2">(19/18) </text:span> ⲁⲥⲡⲁⲍⲉ ⲙ̅ⲙⲟⲕ· ⲁϥⲧⲱⲟⲩⲛ ⲛ̅‐ <text:line-break/><text:span text:style-name="T1"> </text:span><text:span text:style-name="T2">(19/19) </text:span> ⲛⲉϥⲃⲁⲗ ⲉϩⲣⲁⲓ̈ ⲁϥⲛⲁⲩ ⲉⲣⲟⲟⲩ <text:line-break/><text:soft-page-break/><text:span text:style-name="T1"> </text:span><text:span text:style-name="T2">(19/20) </text:span> [ⲉ]ⲩ̣ⲣ̅ⲁⲥⲡⲁⲍⲉ ⲙ̅ⲙⲟϥ· ⲧⲟⲧⲉ ⲡⲓ‐ <text:line-break/><text:span text:style-name="T1"> </text:span><text:span text:style-name="T2">(19/21) </text:span> [ⲡ̅ⲛ̅ⲁ̅] ⲉⲧ̣[ⲟⲩ]ⲁⲁⲃ ⲉⲧⲉ ⲛⲉϥϣⲁϫⲉ <text:line-break/><text:span text:style-name="T1"> </text:span><text:span text:style-name="T2">(19/22) </text:span> ⲛ̣ⲙ̣̅[ⲙⲁϥ ⲁϥ]ⲧ̣ⲱⲣⲡ̅’ ⲙ̅ⲙⲟϥ ⲉϩⲣⲁⲓ̈ <text:line-break/><text:span text:style-name="T1"> </text:span><text:span text:style-name="T2">(19/23) </text:span> ⲉⲡ̣ϫ̣ⲓ̣ⲥⲉ· ϣⲁϩⲣⲁⲓ̈ ⲉϯⲙⲉ[ϩϣⲟⲙ]‐ <text:line-break/><text:span text:style-name="T1"> </text:span><text:span text:style-name="T2">(19/24) </text:span> ⲧⲉ ⲙ̅ⲡⲉ· ⲁⲩⲱ ⲁϥⲟⲩⲱ̣[ⲧⲃ̅ ⲉ]‐ <text:line-break/><text:span text:style-name="T1"> </text:span><text:span text:style-name="T2">(19/25) </text:span> ϩⲣⲁⲓ̈ ⲉϯⲙⲉϩϥⲧⲟ ⲙ̅[ⲡⲉ· ⲁϥⲟⲩ]‐ <text:line-break/><text:span text:style-name="T1"> </text:span><text:span text:style-name="T2">(19/26) </text:span> ⲱϣⲃ̅ ⲛⲁϥ ⲛ̅ϭⲓ ⲡⲓⲡ̅ⲛ̣̅̅[̅ⲁ̅ ⲉⲧⲟⲩⲁⲁⲃ] <text:line-break/><text:span text:style-name="T1"> </text:span><text:span text:style-name="T2">(19/27) </text:span> ⲉϥϫⲱ ⲙ̅ⲙⲟⲥ ϫⲉ ϭⲱϣ[ⲧ̅] <text:line-break/><text:span text:style-name="T1"> </text:span><text:span text:style-name="T2">(19/28) </text:span> ⲁⲩⲱ ⲉⲛⲁⲩ ⲉⲡⲉⲕ̣ⲉ̣ⲓ̣ⲛ[ⲉ {ϩ̅ⲓ}]‐ <text:line-break/><text:span text:style-name="T1"> </text:span><text:span text:style-name="T2">(19/29) </text:span> ϫⲙ̅ ⲡⲕⲁϩ ⲁⲩⲱ ⲁϥϭ̣[ⲱϣⲧ̅ ⲉ]‐ <text:line-break/><text:span text:style-name="T1"> </text:span><text:span text:style-name="T2">(19/30) </text:span> ⲡⲉⲥⲏⲧ’ ⲁϥⲛⲁⲩ ⲉⲛⲏ ⲉ̣[ⲧ’{ϩ̅ⲓ}ϫⲙ̅] <text:line-break/><text:span text:style-name="T1"> </text:span><text:span text:style-name="T2">(19/31) </text:span> ⲡⲕⲁ̣[ϩ·] ⲁϥⲉⲓⲱⲣⲙ̅ [ⲁⲩⲱ ⲁϥⲛⲁⲩ] <text:line-break/><text:span text:style-name="T1"> </text:span><text:span text:style-name="T2">(19/32) </text:span> ⲉⲛⲉ[ⲧ’]{ϩ̣̅̅ⲓ}ϫⲛ̅ ⲧ[....ⲧⲟⲧⲉ] <text:line-break/><text:span text:style-name="T1"> </text:span><text:span text:style-name="T2">(20/1) </text:span> [ⲁϥ]ⲉ̣ⲓ̣[ⲱ]ⲣⲙ̅ [ⲉⲡⲉⲥⲏⲧ’ ⲁⲩⲱ ⲁϥ]ⲛⲁⲩ <text:line-break/><text:span text:style-name="T1"> </text:span><text:span text:style-name="T2">(20/2) </text:span> [ⲉ]ⲡⲓⲙⲛ̅ⲧ’ⲥ̣ⲛⲟ[ⲟⲩⲥ] ⲛ̣̅ⲛⲁⲡ̣ⲟⲥⲧⲟⲗⲟ[ⲥ] <text:line-break/><text:span text:style-name="T1"> </text:span><text:span text:style-name="T2">(20/3) </text:span> [ϩⲁ] ⲧⲉϥⲟⲩⲛⲁⲙ [ⲁⲩⲱ] ϩⲁ ⲧⲉϥϭⲁϫⲏ̅ <text:line-break/><text:span text:style-name="T1"> </text:span><text:span text:style-name="T2">(20/4) </text:span> ϩ̣ⲛ̅ ϯⲕⲧⲓⲥⲓⲥ· ⲛⲉⲣ̣[ⲉ]ⲡⲓⲡ̅ⲛ̅ⲁ̅ ⲇⲉ ⲛⲉϥ‐ <text:line-break/><text:span text:style-name="T1"> </text:span><text:span text:style-name="T2">(20/5) </text:span> ⲙⲟⲟϣⲉ ϩⲁϫⲱⲟⲩ· ⲁⲓ̈ⲛⲁⲩ ⲇⲉ <text:line-break/><text:span text:style-name="T1"> </text:span><text:span text:style-name="T2">(20/6) </text:span> ϩⲛ̅ ϯⲙⲉϩϥⲧⲟ ⲙ̅ⲡⲉ̣ ⲕ̣ⲁⲧⲁ ⲅⲉⲛⲟⲥ ⲁ̣ⲓ̈‐ <text:line-break/><text:span text:style-name="T1"> </text:span><text:span text:style-name="T2">(20/7) </text:span> ⲛⲁⲩ ⲇⲉ ⲉⲛⲓⲁⲅ’ⲅⲉⲗⲟⲥ ⲉⲩⲉⲓⲛⲉ ⲛ̅‐ <text:line-break/><text:span text:style-name="T1"> </text:span><text:span text:style-name="T2">(20/8) </text:span> ⲛⲟⲩⲧⲉ· ⲉⲛⲓⲁⲅ’ⲅⲉⲗⲟⲥ ⲉⲩ̣[ⲉ]ⲓ̣ⲛ̣ⲉ <text:line-break/><text:span text:style-name="T1"> </text:span><text:span text:style-name="T2">(20/9) </text:span> ⲛ̅ⲛⲟⲩⲯⲩⲭⲏ ⲉⲃⲟⲗ ϩⲙ̅ ⲡⲕⲁϩ ⲛ̅ⲧⲉ <text:line-break/><text:span text:style-name="T1"> </text:span><text:span text:style-name="T2">(20/10) </text:span> ⲛⲉⲧ’ⲙⲟⲟⲩⲧ’· ⲁⲩⲕⲁⲁⲥ ϩⲛ̅ ϯⲡⲩⲗⲏ <text:line-break/><text:span text:style-name="T1"> </text:span><text:span text:style-name="T2">(20/11) </text:span> ⲛ̅ⲧⲉ ϯⲙⲉϩϥⲧⲟ ⲙ̅ⲡⲉ· ⲁ̣[ⲩ]ⲱ ⲛⲉ‐ <text:line-break/><text:span text:style-name="T1"> </text:span><text:span text:style-name="T2">(20/12) </text:span> ⲣⲉⲛⲓⲁⲅ’ⲅⲉⲗⲟⲥ ⲣ̅ⲙⲁⲥⲧⲓⲅⲟⲩ ⲙ̅ⲙⲟⲥ· <text:line-break/><text:span text:style-name="T1"> </text:span><text:span text:style-name="T2">(20/13) </text:span> ⲁⲥⲟⲩⲱϣⲃ̅ ⲛ̅ϭⲓ ϯⲯⲩⲭⲏ ⲉⲥϫⲱ ⲙ̅‐ <text:line-break/><text:span text:style-name="T1"> </text:span><text:span text:style-name="T2">(20/14) </text:span> ⲙⲟⲥ ϫⲉ ⲟⲩ ⲛ̅ⲛⲟⲃⲉ ⲡⲉⲛⲧⲁⲓ̈ⲁⲁϥ <text:line-break/><text:span text:style-name="T1"> </text:span><text:span text:style-name="T2">(20/15) </text:span> ϩⲙ̅ ⲡⲕⲟⲥⲙⲟⲥ· ⲁϥⲟⲩⲱϣⲃ̅ ⲛ̅ϭⲓ ⲡⲓ‐ <text:line-break/><text:span text:style-name="T1"> </text:span><text:span text:style-name="T2">(20/16) </text:span> ⲧⲉⲗⲱⲛⲏⲥ ⲉⲧ’ϩⲙⲟⲟⲥ ϩⲛ̅ ϯⲙⲉϩ‐ <text:line-break/><text:span text:style-name="T1"> </text:span><text:span text:style-name="T2">(20/17) </text:span> ϥⲧⲟ ⲙ̅ⲡⲉ ⲉϥϫⲱ ⲙ̅ⲙⲟⲥ ϫⲉ ⲛⲉⲣⲉ‐ <text:line-break/><text:span text:style-name="T1"> </text:span><text:span text:style-name="T2">(20/18) </text:span> ⲙ̅ⲡϣⲁ ⲁⲛ ⲛ̅ⲉⲓⲣⲉ ⲛ̅ⲛⲉⲓ̈ⲁⲛⲟⲙⲓ[ⲁ] <text:line-break/><text:span text:style-name="T1"> </text:span><text:span text:style-name="T2">(20/19) </text:span> ⲧⲏⲣⲟⲩ ⲉⲧ’ϩⲣⲁⲓ̈ ϩⲙ̅ ⲡⲕⲟⲥ̣ⲙ̣ⲟⲥ <text:line-break/><text:span text:style-name="T1"> </text:span><text:span text:style-name="T2">(20/20) </text:span> ⲛ̅ⲧⲉ ⲛⲉⲧ’ⲙⲟⲟⲩⲧ’· ⲁⲥⲟ̣[ⲩⲱ]ϣⲃ̅ <text:line-break/><text:span text:style-name="T1"> </text:span><text:span text:style-name="T2">(20/21) </text:span> ⲛ̅ϭⲓ ϯⲯⲩⲭⲏ ⲉⲥϫⲱ̣ [ⲙ̅ⲙⲟⲥ] ϫ̣ⲉ ⲁ‐ <text:line-break/><text:span text:style-name="T1"> </text:span><text:span text:style-name="T2">(20/22) </text:span> ⲛⲓ ⲙⲛ̅ⲧⲣⲉ ⲙⲁⲣⲟⲩ[ⲧⲁⲙⲟ]ⲕ̣ ϫⲉ <text:line-break/><text:span text:style-name="T1"> </text:span><text:span text:style-name="T2">(20/23) </text:span> [ⲛ̅ⲧⲁ]ⲓ̣̈ⲣ̅ ⲁⲛⲟⲙⲓⲁ ϩⲛ̅ ⲁϣ ⲛ̅ⲥⲱⲙ[ⲁ] <text:line-break/><text:span text:style-name="T1"> </text:span><text:span text:style-name="T2">(20/24) </text:span> [ⲕⲟⲩ]ⲱ̣ϣ ⲉⲓⲛⲉ ⲛ̅ⲛⲟⲩϫⲱⲙⲉ̣ <text:line-break/><text:span text:style-name="T1"> </text:span><text:span text:style-name="T2">(20/25) </text:span> [ⲉⲱϣ {ϩ̅ⲓ}]ⲱ̣ⲱϥ· ⲁⲩⲱ ⲁⲩ{ⲉⲓ} ⲛ̅ϭⲓ <text:line-break/><text:span text:style-name="T1"> </text:span><text:span text:style-name="T2">(20/26) </text:span> [ⲡϣⲟ]ⲙ̣ⲉⲧ’ ⲙ̅ⲙⲛ̅ⲧⲣⲉ· ⲁϥⲟⲩⲱ <text:line-break/><text:span text:style-name="T1"> </text:span><text:span text:style-name="T2">(20/27) </text:span> [ϣⲃ̅] ⲛ̅ϭⲓ ⲡϣⲟⲣⲡ̅’ ⲉϥϫⲱ ⲙ̅ⲙⲟⲥ <text:line-break/><text:span text:style-name="T1"> </text:span><text:span text:style-name="T2">(20/28) </text:span> [ϫⲉ ⲙⲏ] ⲁ̣ⲛⲟⲕ ⲁⲛ ⲁⲓ̈ϣⲱⲡⲉ <text:line-break/><text:span text:style-name="T1"> </text:span><text:span text:style-name="T2">(20/29) </text:span> [ⲉⲓ̈ϩⲙ̅] ⲡ̣ⲥⲱⲙⲁ ϫⲉⲡ’ ⲥⲛⲁⲩ <text:line-break/><text:span text:style-name="T1"> </text:span><text:span text:style-name="T2">(20/30) </text:span> [...ⲁ]ⲓ̈ⲧⲱⲱⲛ ⲉ̣ϩ̣ⲣⲁⲓ̈ ⲉϫⲱ <text:line-break/><text:span text:style-name="T1"> </text:span><text:span text:style-name="T2">(21/1) </text:span> ϣⲁⲛ[ⲧⲉϣⲱⲡ]ⲉ ϩⲛ̅ [ⲟ]ⲩϭⲱⲛⲧ̅’ [ⲙⲛ̅] <text:line-break/><text:span text:style-name="T1"> </text:span><text:span text:style-name="T2">(21/2) </text:span> ⲟⲩⲃⲱ̣[ⲗ]ⲕ̣̅ ⲙ[ⲛ̅] [ⲟ]ⲩⲕⲱ[ϩ]· ⲁⲩⲱ ⲁ[ϥ]‐ <text:line-break/><text:span text:style-name="T1"> </text:span><text:span text:style-name="T2">(21/3) </text:span> ⲟⲩⲱϣⲃ̅ ⲛ̅[ϭⲓ] ⲡⲙⲉϩⲥⲛⲁⲩ ⲉϥ[ϫⲱ] <text:line-break/><text:span text:style-name="T1"> </text:span><text:span text:style-name="T2">(21/4) </text:span> ⲙ̅ⲙⲟⲥ ϫⲉ ⲙ[ⲏ] ⲁⲛⲟⲕ ⲁⲛ ⲉⲧⲉ ⲛⲉⲓ̈‐ <text:line-break/><text:soft-page-break/><text:span text:style-name="T1"> </text:span><text:span text:style-name="T2">(21/5) </text:span> ϩⲙ̅ ⲡⲕⲟⲥⲙⲟⲥ [ⲁ]ⲩⲱ ⲁⲓ̈{ⲉ̅ⲓ} ⲉϩⲟⲩⲛ ⲙ̅‐ <text:line-break/><text:span text:style-name="T1"> </text:span><text:span text:style-name="T2">(21/6) </text:span> ⲡⲛⲁⲩ ⲛ̅ϫⲡ̅ϯ̣· ⲁⲩⲱ ⲁⲓ̈ⲛⲁⲩ ⲉⲣⲟ <text:line-break/><text:span text:style-name="T1"> </text:span><text:span text:style-name="T2">(21/7) </text:span> ⲁⲓ̈ⲣ̅ⲉⲡⲓⲑⲩⲙⲓ ⲉⲣⲟ· ⲁⲩⲱ ⲉⲓⲥ ϩⲏⲧⲉ <text:line-break/><text:span text:style-name="T1"> </text:span><text:span text:style-name="T2">(21/8) </text:span> ϭⲉ ϯⲛⲟⲩ ϯⲥⲟϩⲉ ⲙ̅ⲙⲟ ⲉⲧⲃⲉ ⲛⲓ‐ <text:line-break/><text:span text:style-name="T1"> </text:span><text:span text:style-name="T2">(21/9) </text:span> ϩⲱⲧⲃ̅ ⲉⲧⲁⲁⲁⲩ· ⲁϥⲟⲩⲱϣⲃ̅ ⲛ̅ϭⲓ <text:line-break/><text:span text:style-name="T1"> </text:span><text:span text:style-name="T2">(21/10) </text:span> ⲡⲙⲉϩϣⲟⲙⲉⲧ’ ⲉϥϫⲱ ⲙ̅ⲙⲟⲥ <text:line-break/><text:span text:style-name="T1"> </text:span><text:span text:style-name="T2">(21/11) </text:span> ϫⲉ ⲙ[ⲏ] ⲁ̣ⲛⲟⲕ ⲁⲛ ⲁⲓ̈ⲉⲓ ϣⲁⲣⲟ ⲛ̅ϫⲡ̅’ <text:line-break/><text:span text:style-name="T1"> </text:span><text:span text:style-name="T2">(21/12) </text:span> ⲙⲛ̅ⲧ’ⲥⲛⲟⲟⲩⲥ ⲙ̅ⲡⲉϩⲟⲟⲩ ⲉⲣⲉ‐ <text:line-break/><text:span text:style-name="T1"> </text:span><text:span text:style-name="T2">(21/13) </text:span> ⲡⲣⲏ ⲛⲁϩⲱⲧⲡ̅’ ⲁⲓ̈ϯ ⲕⲁⲕⲉ ⲛⲉ <text:line-break/><text:span text:style-name="T1"> </text:span><text:span text:style-name="T2">(21/14) </text:span> ϣⲁⲛⲧⲉϫⲱⲕ ⲛⲉⲛⲟⲃⲉ ⲉⲃⲟⲗ· <text:line-break/><text:span text:style-name="T1"> </text:span><text:span text:style-name="T2">(21/15) </text:span> ⲛⲁⲓ̈ ⲉⲧⲁⲥⲥⲱⲧⲙ̅ ⲉⲣⲟⲟⲩ ⲛ̅ϭⲓ ϯ‐ <text:line-break/><text:span text:style-name="T1"> </text:span><text:span text:style-name="T2">(21/16) </text:span> ⲯⲩⲭⲏ ⲁⲥⲉⲓⲱⲣⲙ̅ ⲉⲡⲉⲥⲏⲧ’ ⲉⲥϥⲓ <text:line-break/><text:span text:style-name="T1"> </text:span><text:span text:style-name="T2">(21/17) </text:span> ϣⲛϩⲏⲧ’· ⲁⲩⲱ ⲧⲟⲧⲉ ⲁⲥⲉⲓⲱⲣⲙ̅ <text:line-break/><text:span text:style-name="T1"> </text:span><text:span text:style-name="T2">(21/18) </text:span> ⲉⲧⲡⲉ ⲁⲩⲛⲟϫⲥ̅ ⲉⲡⲉⲥⲏⲧ’· <text:line-break/><text:span text:style-name="T1"> </text:span><text:span text:style-name="T2">(21/19) </text:span> ϯ[ⲯ]ⲩⲭⲏ ⲉⲧⲁⲩⲛⲟϫⲥ̅ ⲉⲡⲉⲥⲏⲧ’ <text:line-break/><text:span text:style-name="T1"> </text:span><text:span text:style-name="T2">(21/20) </text:span> [ⲁⲥ{ⲉ̅ⲓ}] ⲉ̣[ⲟⲩ]ⲥ̣ⲱⲙⲁ ⲉⲁⲩⲥⲃ̅ⲧⲱⲧϥ̅ <text:line-break/><text:span text:style-name="T1"> </text:span><text:span text:style-name="T2">(21/21) </text:span> [ⲛⲁⲥ ⲁⲩ]ⲱ̣ ⲉⲓⲥ ϩⲏⲧⲉ ⲁⲩϫⲱⲕ ⲉⲃⲟⲗ̣ <text:line-break/><text:span text:style-name="T1"> </text:span><text:span text:style-name="T2">(21/22) </text:span> [ⲛ̅ϭⲓ ⲛⲉ]ⲥⲙⲛ̅ⲧⲣⲉⲟⲩ· ⲁⲛ[ⲟⲕ ⲇⲉ] <text:line-break/><text:span text:style-name="T1"> </text:span><text:span text:style-name="T2">(21/23) </text:span> [ⲁⲓ̈ⲱⲣ]ⲙ̅ ⲉⲧⲡⲉ ⲁⲩ[ⲱ] ⲁⲓ̈ⲛ[ⲁⲩ] <text:line-break/><text:span text:style-name="T1"> </text:span><text:span text:style-name="T2">(21/24) </text:span> [ⲉⲡⲓⲡ̅]̅ⲛ̣̅̅ⲁ̅ ⲉϥϫⲱ ⲙ̅ⲙ[ⲟⲥ ⲛⲁⲓ̈] <text:line-break/><text:span text:style-name="T1"> </text:span><text:span text:style-name="T2">(21/25) </text:span> [ϫⲉ ⲡ]ⲁ̣ⲩⲗⲟⲥ ⲁⲙⲟⲩ ⲟⲩⲁ̣[ⲧⲃⲕ̅] <text:line-break/><text:span text:style-name="T1"> </text:span><text:span text:style-name="T2">(21/26) </text:span> [ⲉⲣⲟ]ⲓ̈· ⲁⲛⲟⲕ ⲇⲉ ⲉⲓ̈ⲙ[ⲟⲟϣⲉ] <text:line-break/><text:span text:style-name="T1"> </text:span><text:span text:style-name="T2">(21/27) </text:span> ⲁⲥⲟⲩⲱⲛ ⲛ̅ϭⲓ ⲧⲡⲩⲗ̣[ⲏ ⲁⲩⲱ] <text:line-break/><text:span text:style-name="T1"> </text:span><text:span text:style-name="T2">(21/28) </text:span> ⲁⲓ̈{ⲉ̅ⲓ} ⲉϩⲣⲁⲓ̈ ⲉϯⲙⲉϩϯ ⲙ̅[ⲡⲉ]ⲛⲁϣⲧ̅’ <text:line-break/><text:span text:style-name="T1"> </text:span><text:span text:style-name="T2">(21/29) </text:span> ⲁⲓ̈ⲛⲁⲩ ⲇⲉ ⲉⲛⲁϣⲃⲏ[ⲣ ⲁⲡⲟⲥ]‐ <text:line-break/><text:span text:style-name="T1"> </text:span><text:span text:style-name="T2">(21/30) </text:span> ⲧⲟⲗⲟ̣[ⲥ ⲉ]ⲩⲙ̣ⲟ̣ⲟ[ϣⲉ] ⲛ̣[ⲙ̅ⲙⲁⲓ̈] <text:line-break/><text:span text:style-name="T1"> </text:span><text:span text:style-name="T2">(22/1) </text:span> ⲉⲣⲉ̣ⲡⲉⲡ̅ⲛ̅ⲁ̅ ⲛⲉϥⲙⲟⲟϣ̣[ⲉ] ⲛⲙ̅ⲙⲁⲛ· <text:line-break/><text:span text:style-name="T1"> </text:span><text:span text:style-name="T2">(22/2) </text:span> ⲁ̣ⲩⲱ ⲁⲓ̈ⲛⲁⲩ ⲉ̣ⲩ̣ⲛⲟϭ ⲛ̅ⲁⲅ’ⲅⲉⲗⲟⲥ <text:line-break/><text:span text:style-name="T1"> </text:span><text:span text:style-name="T2">(22/3) </text:span> ϩ̣ⲛ̅ ϯⲙⲉϩϯ ⲙ̅ⲡ[ⲉ] ⲉϥⲁⲙⲁϩⲧⲉ <text:line-break/><text:span text:style-name="T1"> </text:span><text:span text:style-name="T2">(22/4) </text:span> ⲛ̅ⲛⲟⲩϭⲉⲣⲱⲃ ⲙ̅ⲡⲉⲛⲓⲡⲉ ϩⲛ̅ ⲧⲉϥ‐ <text:line-break/><text:span text:style-name="T1"> </text:span><text:span text:style-name="T2">(22/5) </text:span> ϭⲓϫ· ⲉⲩⲛ̅ ϩⲉⲛⲕⲉⲁⲅ’ⲅⲉⲗⲟⲥ ⲛⲙ̅‐ <text:line-break/><text:span text:style-name="T1"> </text:span><text:span text:style-name="T2">(22/6) </text:span> ⲙⲁϥ ⲅ̅ ⲁⲩⲱ ⲁⲓ̈ⲱⲣⲙ̅ ⲉϩⲟⲩⲛ ⲉ‐ <text:line-break/><text:span text:style-name="T1"> </text:span><text:span text:style-name="T2">(22/7) </text:span> ⲡⲉⲩϩⲟ· ⲛ̅ⲧⲟⲟⲩ ⲇⲉ ⲛⲉⲩⲣ̅ⲉⲣⲓⲥⲉ <text:line-break/><text:span text:style-name="T1"> </text:span><text:span text:style-name="T2">(22/8) </text:span> ⲙⲛ̅ ⲛⲉⲩⲉⲣⲏⲟⲩ· ⲉⲣⲉϩⲉⲛⲙⲁⲥⲧⲓ‐ <text:line-break/><text:span text:style-name="T1"> </text:span><text:span text:style-name="T2">(22/9) </text:span> ⲕⲟⲥ ⲛ̅ⲧⲟⲟⲧⲟⲩ ⲉⲩⲧⲱⲃⲉⲥ ⲛ̅ⲛⲓ‐ <text:line-break/><text:span text:style-name="T1"> </text:span><text:span text:style-name="T2">(22/10) </text:span> ⲯⲩⲭⲟⲟⲩⲉ ⲉϩⲣⲁⲓ̈ ⲉⲧⲉⲕⲣⲓⲥⲓⲥ· <text:line-break/><text:span text:style-name="T1"> </text:span><text:span text:style-name="T2">(22/11) </text:span> ⲁⲛⲟⲕ ⲇⲉ ⲛⲉⲓ̈ⲙⲟⲟϣⲉ ⲙⲛ̅ ⲡⲉⲡ̅ⲛ̅ⲁ̅ <text:line-break/><text:span text:style-name="T1"> </text:span><text:span text:style-name="T2">(22/12) </text:span> ⲁⲩⲱ ⲁⲥⲟⲩⲱⲛ ⲛⲁⲓ̈ ⲛ̅ϭⲓ ⲧⲡⲩⲗⲏ <text:line-break/><text:span text:style-name="T1"> </text:span><text:span text:style-name="T2">(22/13) </text:span> ⲧⲟⲧⲉ ⲁⲛ{ⲉ̅ⲓ} ⲉϩⲣⲁⲓ̈ ⲉϯⲙⲉϩⲥⲟ ⲙ̅ⲡⲉ <text:line-break/><text:span text:style-name="T1"> </text:span><text:span text:style-name="T2">(22/14) </text:span> ⲁⲩⲱ ⲁⲓ̈ⲛⲁⲩ ⲉⲛⲁϣⲃⲏⲣ ⲁⲡⲟⲥⲧⲟⲗⲟⲥ <text:line-break/><text:span text:style-name="T1"> </text:span><text:span text:style-name="T2">(22/15) </text:span> ⲉⲩⲙⲟⲟϣⲉ ⲛⲙ̅ⲙⲁⲓ̈· ⲁⲩⲱ ⲡⲓⲡ̅ⲛ̅ⲁ̅ <text:line-break/><text:span text:style-name="T1"> </text:span><text:span text:style-name="T2">(22/16) </text:span> ⲉⲧⲟⲩⲁⲁⲃ ⲛⲉϥϫⲓ ⲙ̅ⲙⲟⲉⲓ ϩⲁϫⲱⲟⲩ· <text:line-break/><text:span text:style-name="T1"> </text:span><text:span text:style-name="T2">(22/17) </text:span> ⲁⲩⲱ ⲁⲓ̈ⲱⲣⲙ̅ ⲉⲡϫⲓⲥⲉ ⲁⲓ̈ⲛⲁⲩ ⲉⲩ‐ <text:line-break/><text:span text:style-name="T1"> </text:span><text:span text:style-name="T2">(22/18) </text:span> ⲛⲟϭ ⲛ̅ⲟⲩⲟⲉⲓⲛ ⲉϥⲣ̅ ⲟⲩⲟⲉⲓⲛ ⲉ̣ⲡⲉⲥⲏⲧ’ <text:line-break/><text:span text:style-name="T1"> </text:span><text:span text:style-name="T2">(22/19) </text:span> ⲉϩⲣⲁⲓ̈ ϩⲛ̅ ϯⲙⲉϩⲥⲟ ⲙ̅ⲡⲉ· ⲁⲉⲓ[ⲟ]ⲩ̣ⲱ‐ <text:line-break/><text:span text:style-name="T1"> </text:span><text:span text:style-name="T2">(22/20) </text:span> ϣⲃ̅ ⲉⲓ̈ϫⲱ ⲙ̅ⲙⲟⲥ ⲙ̅ⲡⲓⲧⲉⲗⲱ̣[ⲛⲏ]ⲥ̣ <text:line-break/><text:span text:style-name="T1"> </text:span><text:span text:style-name="T2">(22/21) </text:span> ⲉⲧ’ϩⲛ̅ ϯⲙⲉϩⲥⲟ ⲙ̅ⲡⲉ [ϫⲉ ⲁⲟⲩⲱⲛ] <text:line-break/><text:soft-page-break/><text:span text:style-name="T1"> </text:span><text:span text:style-name="T2">(22/22) </text:span> ⲛⲁⲓ̈· ⲁⲩⲱ ⲡⲓⲡⲛ̅ⲁ̅ ⲉⲧⲟ̣[ⲩⲁⲁⲃ ⲉⲧ’]‐ <text:line-break/><text:span text:style-name="T1"> </text:span><text:span text:style-name="T2">(22/23) </text:span> [ϩⲁⲧⲁ]ⲉϩⲏ ⲁϥⲟⲩⲱⲛ ⲛ[ⲁⲓ̈· ⲧⲟⲧⲉ] <text:line-break/><text:span text:style-name="T1"> </text:span><text:span text:style-name="T2">(22/24) </text:span> [ⲁⲛ{ⲉ̅]̅ⲓ̣̅} ⲉϩⲣⲁ̣ⲓ̈ ⲉϯⲙⲉϩⲥⲁ[ϣϥⲉ ⲙ̅ⲡⲉ] <text:line-break/><text:span text:style-name="T1"> </text:span><text:span text:style-name="T2">(22/25) </text:span> [ⲁⲓ̈ⲛⲁ]ⲩ̣ ⲉ̣ⲩϩⲗ̅ⲗⲟ ⲛ̅ⲣⲱ[ⲙⲉ <text:line-break/><text:span text:style-name="T1"> </text:span><text:span text:style-name="T2">(22/26) </text:span> [....]ⲉ ⲙ̅ⲡⲟⲩⲟⲉⲓⲛ· [ⲁⲩⲱ ⲉⲣⲉ]‐ <text:line-break/><text:span text:style-name="T1"> </text:span><text:span text:style-name="T2">(22/27) </text:span> [ⲡⲉϥϩⲟⲉⲓ]ⲧⲉ ⲟⲩⲟⲃⲉϣ· ⲛⲉⲣ[ⲉⲡⲉϥⲑⲣⲟ]‐ <text:line-break/><text:span text:style-name="T1"> </text:span><text:span text:style-name="T2">(22/28) </text:span> [ⲛⲟⲥ ⲉ]ⲧ’̣ϩⲛ̅ ϯⲙⲉϩⲥⲁϣϥⲉ ⲙ̅ⲡⲉ <text:line-break/><text:span text:style-name="T1"> </text:span><text:span text:style-name="T2">(22/29) </text:span> [ⲛⲉϥ]ⲉ̣ ⲛ̅ⲟⲩⲟⲉⲓⲛ ⲛ̅ϩⲟⲩⲟ ⲉⲡⲣⲏ ⲛ̅‐ <text:line-break/><text:span text:style-name="T1"> </text:span><text:span text:style-name="T2">(22/30) </text:span> [ⲥⲁϣ]ϥ̣̅ ⲛ̅ⲕⲱⲃ ⲛ̅ⲥⲟⲡ’[·] ⲁ̣ϥⲟⲩⲱ‐ <text:line-break/><text:span text:style-name="T1"> </text:span><text:span text:style-name="T2">(23/1) </text:span> ϣⲃ̅ ⲛ̅ϭⲓ ⲡⲓϩⲗ̅ⲗⲟ ⲉϥϫⲱ ⲙ̅ⲙⲟⲥ ⲛⲁ[ⲓ̈] <text:line-break/><text:span text:style-name="T1"> </text:span><text:span text:style-name="T2">(23/2) </text:span> ϫⲉ ⲉⲕⲛⲁⲃⲱⲕ ⲉⲧⲱⲛ ⲡⲁⲩⲗⲟⲥ <text:line-break/><text:span text:style-name="T1"> </text:span><text:span text:style-name="T2">(23/3) </text:span> ⲡⲉⲧ’ⲥⲙⲁⲙⲁ̣ⲁ̣ⲧ’· ⲁⲩⲱ ⲡⲉⲛⲧⲁ[ⲩ]‐ <text:line-break/><text:span text:style-name="T1"> </text:span><text:span text:style-name="T2">(23/4) </text:span> ⲡⲟⲣϫϥ̅ ⲉⲃⲟⲗ ϫⲓⲛ ⲛ̅ϩⲏⲧⲥ̅ ⲛ̅ⲧⲉϥⲙⲁⲁⲩ <text:line-break/><text:span text:style-name="T1"> </text:span><text:span text:style-name="T2">(23/5) </text:span> ⲁⲛⲟⲕ ⲇⲉ ⲁⲓ̈ϭⲱϣⲧ̅’ ⲛ̅ⲥⲁ ⲡⲓⲡ̅ⲛ̅ⲁ̅ <text:line-break/><text:span text:style-name="T1"> </text:span><text:span text:style-name="T2">(23/6) </text:span> ⲁⲩⲱ ⲛⲉϥⲕⲓⲙ ⲛ̅ⲧⲉϥⲁⲡⲉ ⲉϥϫⲱ <text:line-break/><text:span text:style-name="T1"> </text:span><text:span text:style-name="T2">(23/7) </text:span> ⲙ̅ⲙⲟⲥ ⲛⲁⲓ̈ ϫⲉ ϣⲁϫⲉ ⲛⲙ̅ⲙⲉϥ· <text:line-break/><text:span text:style-name="T1"> </text:span><text:span text:style-name="T2">(23/8) </text:span> ⲁⲩⲱ ⲁⲓ̈ⲟⲩⲱϣⲃ̅ ⲉⲓ̈ϫⲱ ⲙ̅ⲙⲟⲥ <text:line-break/><text:span text:style-name="T1"> </text:span><text:span text:style-name="T2">(23/9) </text:span> ⲙ̅ⲡⲓϩⲗ̅ⲗⲟ ϫⲉ ⲉⲓ̈ⲛⲁⲃⲱⲕ ⲉⲡⲧⲟⲡⲟⲥ <text:line-break/><text:span text:style-name="T1"> </text:span><text:span text:style-name="T2">(23/10) </text:span> ⲛ̅ⲧⲁⲓ̈{ⲉ̅ⲓ} ⲉⲃⲟⲗ ⲛ̅ϩⲏⲧϥ̅· ⲁⲩⲱ ⲁϥⲟⲩ‐ <text:line-break/><text:span text:style-name="T1"> </text:span><text:span text:style-name="T2">(23/11) </text:span> ⲱϣⲃ̅ ⲛⲁⲓ̈ ⲛ̅ϭⲓ ⲡⲓϩⲗ̅ⲗⲟ ϫⲉ ⲉⲕⲧⲱⲛ ⲡⲉ· <text:line-break/><text:span text:style-name="T1"> </text:span><text:span text:style-name="T2">(23/12) </text:span> ⲁⲓ̈ⲟⲩⲱϣⲃ̅ ϩⲱ ⲉⲓ̈ϫⲱ ⲙ̅ⲙⲟⲥ ϫⲉ <text:line-break/><text:span text:style-name="T1"> </text:span><text:span text:style-name="T2">(23/13) </text:span> ⲉⲓ̈ⲛⲁⲃⲱⲕ ⲉϩⲣⲁⲓ̈ ⲉⲡⲕⲟⲥⲙⲟⲥ ⲛ̅ⲧⲉ <text:line-break/><text:span text:style-name="T1"> </text:span><text:span text:style-name="T2">(23/14) </text:span> ⲛⲉⲧ’ⲙⲟⲟⲩⲧ’ ϫⲉⲕⲁⲁⲥ ⲉⲓ̈ⲛⲁⲣ̅ⲁⲓ‐ <text:line-break/><text:span text:style-name="T1"> </text:span><text:span text:style-name="T2">(23/15) </text:span> ⲭⲙⲁⲗⲱⲧⲓⲍⲉ ⲛ̅ϯⲁⲓⲭⲙⲁⲗⲱⲥⲓⲁ <text:line-break/><text:span text:style-name="T1"> </text:span><text:span text:style-name="T2">(23/16) </text:span> ⲧⲏ ⲉⲧⲁⲩⲣ̅ⲁⲓⲭⲙⲁⲗⲱⲧⲓⲍⲉ ⲙ̅ⲙⲟⲥ <text:line-break/><text:span text:style-name="T1"> </text:span><text:span text:style-name="T2">(23/17) </text:span> ϩⲛ̅ ϯⲁⲓⲭⲙⲁⲗⲱⲥⲓⲁ ⲛ̅ⲧⲉ ⲧⲃⲁⲃⲩⲗⲱⲛ· <text:line-break/><text:span text:style-name="T1"> </text:span><text:span text:style-name="T2">(23/18) </text:span> ⲁϥⲟⲩⲱϣⲃ̅ ⲛⲁⲓ̈ ⲛ̅ϭⲓ ⲡϩⲗ̅ⲗⲟ ⲉϥ‐ <text:line-break/><text:span text:style-name="T1"> </text:span><text:span text:style-name="T2">(23/19) </text:span> ϫⲱ ⲙ̅ⲙⲟⲥ ϫⲉ ⲛ̅ⲁϣ ⲛ̅ϩⲉ ⲉⲕⲁϭⲛ̅‐ <text:line-break/><text:span text:style-name="T1"> </text:span><text:span text:style-name="T2">(23/20) </text:span> ϭⲟⲙ̓ ⲉⲥⲓϩⲉ ⲉⲃⲟⲗ {ϩ̅ⲓ}ⲧⲟⲟⲧ’· ϭⲱ‐ <text:line-break/><text:span text:style-name="T1"> </text:span><text:span text:style-name="T2">(23/21) </text:span> ϣⲧ̅’ ⲁⲩⲱ ⲛ̅ⲅ’ⲛⲁⲩ ⲉⲛⲓⲁⲣⲭⲏ ⲙⲛ̅ <text:line-break/><text:span text:style-name="T1"> </text:span><text:span text:style-name="T2">(23/22) </text:span> ⲛⲓⲉⲝⲟⲩⲥⲓⲁ· ⲁϥⲟⲩⲱϣ[ⲃ̅ ⲛ̅ϭⲓ ⲡⲓ]‐ <text:line-break/><text:span text:style-name="T1"> </text:span><text:span text:style-name="T2">(23/23) </text:span> ⲡⲛ̅ⲁ̅ ⲉϥϫⲱ ⲙ̅ⲙⲟⲥ ϫⲉ ϯ ⲛⲁϥ ⲙ̣̅[ⲡⲓ]‐ <text:line-break/><text:span text:style-name="T1"> </text:span><text:span text:style-name="T2">(23/24) </text:span> ⲥⲏⲙⲓⲟⲛ ⲉⲧⲛ̅ⲧⲟⲟⲧⲕ̅· ⲁⲩⲱ̣ [ϥⲛⲁ]‐ <text:line-break/><text:span text:style-name="T1"> </text:span><text:span text:style-name="T2">(23/25) </text:span> ⲟⲩⲱⲛ ⲛⲁⲕ· ⲁⲩⲱ ⲧⲟⲧⲉ ⲁⲓ̈ϯ [ⲛⲁϥ] <text:line-break/><text:span text:style-name="T1"> </text:span><text:span text:style-name="T2">(23/26) </text:span> ⲙ̅ⲡⲓⲥⲏⲙⲓⲟⲛ· ⲁϥⲕⲱⲧⲉ ⲙ̅ⲡⲉϥϩ̣[ⲟ] <text:line-break/><text:span text:style-name="T1"> </text:span><text:span text:style-name="T2">(23/27) </text:span> ⲉⲡⲉⲥⲏⲧ’ ⲉϩⲣⲁⲓ̈ ⲉⲡⲉϥⲥⲱⲛ[ⲧ’] <text:line-break/><text:span text:style-name="T1"> </text:span><text:span text:style-name="T2">(23/28) </text:span> ⲙⲛ̅ ⲛⲉⲧⲉ ⲛⲱϥ ⲛ̅ⲛⲉⲝⲟⲩⲥ[ⲓⲁ· ⲛⲉ] <text:line-break/><text:span text:style-name="T1"> </text:span><text:span text:style-name="T2">(23/29) </text:span> ⲁⲩⲱ ⲧ̣ⲟ̣ⲧ̣ⲉ̣ [ⲁ]ⲥⲟⲩⲱⲛ ⲛ̅ϭⲓ ϯⲙ[ⲉϩ]‐ <text:line-break/><text:span text:style-name="T1"> </text:span><text:span text:style-name="T2">(23/30) </text:span> 〈ⲥⲁϣϥⲉ〉 ⲙ̅ⲡ[ⲉ] ⲁ̣ⲩⲱ ⲁⲛ{ⲉ̅ⲓ} ⲉϩⲣⲁⲓ̈ [ⲉⲧ]‐ <text:line-break/><text:span text:style-name="T1"> </text:span><text:span text:style-name="T2">(24/1) </text:span> ϩⲟⲅ’ⲇⲟⲁⲥ· ⲁⲓ̈ⲛⲁⲩ ⲇⲉ ⲉⲡⲓⲙⲛ̅‐ <text:line-break/><text:span text:style-name="T1"> </text:span><text:span text:style-name="T2">(24/2) </text:span> ⲧⲥⲛⲟⲟⲩⲥ ⲛ̅ⲛⲁⲡⲟⲥⲧⲟⲗⲟⲥ· ⲁⲩ‐ <text:line-break/><text:span text:style-name="T1"> </text:span><text:span text:style-name="T2">(24/3) </text:span> ⲣ̅ⲁⲥⲡⲁⲍⲉ ⲙ̅ⲙⲟⲓ̣̈ ⲁⲩⲱ ⲁⲛ{ⲉ̅ⲓ} ⲉ‐ <text:line-break/><text:span text:style-name="T1"> </text:span><text:span text:style-name="T2">(24/4) </text:span> ϩⲣⲁⲓ̈ ⲉϯⲙⲉϩⲡⲥⲓⲧⲉ ⲙ̅ⲡⲉ· ⲁⲓ̈ⲣ̅ⲁⲥ‐ <text:line-break/><text:span text:style-name="T1"> </text:span><text:span text:style-name="T2">(24/5) </text:span> ⲡⲁⲍⲉ ⲛ̅ⲛⲏ ⲧⲏⲣⲟⲩ ⲉⲧ’ϩⲛ̅ ϯⲙⲁϩ‐ <text:line-break/><text:span text:style-name="T1"> </text:span><text:span text:style-name="T2">(24/6) </text:span> ⲡⲥⲓⲧⲉ ⲙ̅ⲡⲉ· ⲁⲩⲱ ⲁⲛ{ⲉ̅ⲓ} ⲉϩⲣⲁⲓ̈ <text:line-break/><text:span text:style-name="T1"> </text:span><text:span text:style-name="T2">(24/7) </text:span> ⲉϯⲙⲉϩⲙⲏⲧⲉ ⲙ̅ⲡⲉ· ⲁⲩⲱ ⲁⲓ̈ⲣ̅‐ <text:line-break/><text:soft-page-break/><text:span text:style-name="T1"> </text:span><text:span text:style-name="T2">(24/8) </text:span> ⲁⲥⲡⲁⲍⲉ ⲛ̅ⲛⲁϣⲃⲏⲣ ⲙ̅ⲡ̅ⲛ̅ⲁ̅· <text:line-break/><text:span text:style-name="T1"> </text:span><text:span text:style-name="T2">(24/9) </text:span> ⲧⲁⲡⲟⲕⲁⲗⲩⲯⲓⲥ ⲙ̅ⲡⲁⲩⲗⲟⲥ </text:p>
      <text:p text:style-name="P1"/>
      <text:p text:style-name="P3">( codex V ) The (First) Apocalypse of James</text:p>
      <text:p text:style-name="P2"><text:span text:style-name="T1"> </text:span><text:span text:style-name="T2">(24/10) </text:span> ⲧⲁⲡⲟⲕⲁⲗⲩⲯⲓⲥ ⲛ̅ⲓ̈ⲁⲕⲱⲃⲟⲥ <text:line-break/><text:span text:style-name="T1"> </text:span><text:span text:style-name="T2">(24/11) </text:span> ⲡϫⲟⲉⲓⲥ ⲇⲉ ⲡⲉⲛⲧⲁϥϣⲁϫⲉ ⲛⲙ̅ⲙⲁⲓ̈ <text:line-break/><text:span text:style-name="T1"> </text:span><text:span text:style-name="T2">(24/12) </text:span> ϫⲉ ⲉⲛⲁⲩ ϭⲉ ⲉⲡϫⲱⲕ ⲛ̅ⲧⲉ ⲡⲁⲥⲱⲧⲉ <text:line-break/><text:span text:style-name="T1"> </text:span><text:span text:style-name="T2">(24/13) </text:span> ⲁⲓ̈ϯ ⲙⲁⲉⲓⲛ ⲛⲁⲕ ⲉⲛⲁⲓ̈ ⲓ̈ⲁⲕⲱⲃⲟⲥ <text:line-break/><text:span text:style-name="T1"> </text:span><text:span text:style-name="T2">(24/14) </text:span> ⲡⲁⲥⲟⲛ· ⲉⲓⲕⲏ ⲅⲁⲣ ⲁⲛ ⲁⲓ̈ⲙⲟⲩⲧⲉ <text:line-break/><text:span text:style-name="T1"> </text:span><text:span text:style-name="T2">(24/15) </text:span> ⲉⲣⲟⲕ ϫⲉ ⲡⲁⲥⲟⲛ· ⲉⲛⲧⲟⲕ ⲡⲁⲥⲟⲛ <text:line-break/><text:span text:style-name="T1"> </text:span><text:span text:style-name="T2">(24/16) </text:span> ϩⲣⲁⲓ̈ ϩⲛ̅ ⲑⲩⲗⲏ ⲁⲛ· ⲟⲩⲧⲉ ⲛ̅ϯⲉ ⲛ̅‐ <text:line-break/><text:span text:style-name="T1"> </text:span><text:span text:style-name="T2">(24/17) </text:span> ⲛⲁⲧ’ⲉⲓⲙⲉ ⲉⲣⲟⲕ ⲁⲛ· ϫⲉⲕⲁⲁⲥ ⲉⲓ̈‐ <text:line-break/><text:span text:style-name="T1"> </text:span><text:span text:style-name="T2">(24/18) </text:span> ϣⲁⲛϯ ⲙⲁⲉⲓⲛ ⲛⲁⲕ ⲉⲓⲙⲉ ⲁⲩⲱ <text:line-break/><text:span text:style-name="T1"> </text:span><text:span text:style-name="T2">(24/19) </text:span> ⲥⲱⲧⲙ̅· ⲛⲉⲙⲛ̅ ⲗⲁⲁⲩ ϣⲟⲟⲡ’ ⲛ̅ⲥⲁ <text:line-break/><text:span text:style-name="T1"> </text:span><text:span text:style-name="T2">(24/20) </text:span> ⲡⲉⲧ’ϣⲟⲟⲡ’· ⲟⲩⲁⲧ’ϯ ⲣⲁⲛ ⲉⲣⲟϥ <text:line-break/><text:span text:style-name="T1"> </text:span><text:span text:style-name="T2">(24/21) </text:span> ⲙⲛ̅ⲛ ⲟⲩⲁⲧ’ϣⲁϫⲉ ⲙ̅ⲙⲟϥ ⲡⲉ· <text:line-break/><text:span text:style-name="T1"> </text:span><text:span text:style-name="T2">(24/22) </text:span> ⲁⲛⲟⲕ ϩⲱ ⲁⲛⲟⲕ ⲟⲩⲁⲧ’ϯ ⲣⲁⲛ ⲉⲣⲟϥ <text:line-break/><text:span text:style-name="T1"> </text:span><text:span text:style-name="T2">(24/23) </text:span> ⲉⲃⲟⲗ ϩⲙ̅ ⲡⲉⲧ’ϣⲟⲟⲡ’· ⲛ̅ⲑⲉ ⲉⲧⲁⲩ‐ <text:line-break/><text:span text:style-name="T1"> </text:span><text:span text:style-name="T2">(24/24) </text:span> [ϯ ⲛ̅ⲟⲩ]ⲏⲡⲉ ⲛ̅ⲣⲁⲛ ⲉⲣⲟⲉⲓ ϩⲛ̅ⲥⲛⲁⲩ <text:line-break/><text:span text:style-name="T1"> </text:span><text:span text:style-name="T2">(24/25) </text:span> [ⲉⲃ]ⲟⲗ ϩⲙ̅ ⲡⲉⲧ’ϣⲟⲟⲡ’· ⲁⲛⲟⲕ ⲇⲉ̣ <text:line-break/><text:span text:style-name="T1"> </text:span><text:span text:style-name="T2">(24/26) </text:span> [ϯ]ϣ̣ⲟⲟⲡ’ ϩⲁⲧⲉⲕϩⲏ· ⲉⲡⲓⲇⲏ ⲁⲕϣⲓ‐ <text:line-break/><text:span text:style-name="T1"> </text:span><text:span text:style-name="T2">(24/27) </text:span> [ⲛ]ⲉ ⲛ̅ⲥ̣ⲁ ϯⲙⲛ̅ⲧ’ⲥ{ϩ̅ⲓ}ⲙⲉ· ⲛⲉⲥϣⲟⲟⲡ’ <text:line-break/><text:span text:style-name="T1"> </text:span><text:span text:style-name="T2">(24/28) </text:span> [ⲛ̅]ϭⲓ ϯⲙⲛ̅ⲧ’ⲥ{ϩ̅ⲓ}ⲙⲉ· ⲁⲗⲗⲁ ⲛⲉⲥⲣ̅ ϣⲟ‐ <text:line-break/><text:span text:style-name="T1"> </text:span><text:span text:style-name="T2">(24/29) </text:span> [ⲣⲡ̅ ⲛ̅ϭⲓ] ϯ̣ⲛ̅ⲧ’ⲥ{ϩ̅ⲓ}ⲙⲉ ⲁⲛ· ⲁⲩⲱ <text:line-break/><text:span text:style-name="T1"> </text:span><text:span text:style-name="T2">(24/30) </text:span> [ⲁⲥ]ⲥⲟⲃⲧⲉ ⲛⲁⲥ ⲛ̅ϩ[ⲉ]ⲛϭⲟⲙ ⲙⲛ̅ ⲛⲟⲩⲧⲉ[·] <text:line-break/><text:span text:style-name="T1"> </text:span><text:span text:style-name="T2">(24/31) </text:span> [ⲛ]ⲉ[ⲥ]ϣⲟⲟⲡ’ ⲇⲉ ⲁⲛ [ⲉ]ⲁ̣ⲓ̈{ⲉ̅ⲓ} ⲉⲃⲟⲗ <text:line-break/><text:span text:style-name="T1"> </text:span><text:span text:style-name="T2">(25/1) </text:span> ⲉⲁⲛⲟⲕ ⲟⲩ{ϩ̅ⲓ}ⲕⲱⲛ ⲛ̅ⲧⲉ ⲡⲉⲧ’ϣⲟ[ⲟⲡ] <text:line-break/><text:span text:style-name="T1"> </text:span><text:span text:style-name="T2">(25/2) </text:span> ⲁⲓ̈ⲉⲓⲛⲉ ⲇⲉ ⲉⲃⲟⲗ ⲛ̅ϯ{ϩ̅ⲓ}ⲕⲱⲛ ⲛ̅ⲧⲉ[ϥ] <text:line-break/><text:span text:style-name="T1"> </text:span><text:span text:style-name="T2">(25/3) </text:span> ϫⲉⲕⲁⲁⲥ ⲉⲣⲉⲛⲓϣⲏⲣⲉ ⲛ̅ⲧⲉ ⲡⲉⲧ’ϣ̣[ⲟⲟⲡ] <text:line-break/><text:span text:style-name="T1"> </text:span><text:span text:style-name="T2">(25/4) </text:span> [ϫⲉ] ⲉⲩⲉⲉⲓⲙⲉ ϫⲉ ⲁϣ ⲛⲉ ⲛⲉⲧⲉ ⲛⲱⲟⲩ <text:line-break/><text:span text:style-name="T1"> </text:span><text:span text:style-name="T2">(25/5) </text:span> ⲁⲩⲱ ϫⲉ ⲁϣ ⲛⲉ ⲛ̅ϣⲙ̅ⲙⲟ· ⲉⲓⲥ ϩⲏⲧⲉ <text:line-break/><text:span text:style-name="T1"> </text:span><text:span text:style-name="T2">(25/6) </text:span> ϯⲛⲁϭⲱⲗⲡ̅’ ⲛⲁⲕ ⲉⲃⲟⲗ ⲛ̅ϩⲱⲃ ⲛⲓⲙ <text:line-break/><text:span text:style-name="T1"> </text:span><text:span text:style-name="T2">(25/7) </text:span> ⲙ̅ⲡⲓⲙⲩⲥⲧⲏⲣⲓⲟⲛ· ϫⲉ ⲥⲉⲛⲁⲁⲙⲁϩ‐ <text:line-break/><text:span text:style-name="T1"> </text:span><text:span text:style-name="T2">(25/8) </text:span> ⲧⲉ ⲙ̅ⲙⲟⲉⲓ ⲛ̅ⲥⲁ ⲣⲁⲥⲧⲉ· ⲁⲗⲗⲁ ⲡⲁ‐ <text:line-break/><text:span text:style-name="T1"> </text:span><text:span text:style-name="T2">(25/9) </text:span> ⲥⲱⲧⲉ ϥⲛⲁϣⲱⲡⲉ ⲉϥϩⲏⲛ ⲉϩⲟⲩⲛ· <text:line-break/><text:span text:style-name="T1"> </text:span><text:span text:style-name="T2">(25/10) </text:span> ⲡⲉϫⲉ ⲓ̈ⲁⲕⲱⲃⲟⲥ ϫⲉ ϩⲣⲁⲃⲃⲓ ⲁⲕϫⲟ‐ <text:line-break/><text:span text:style-name="T1"> </text:span><text:span text:style-name="T2">(25/11) </text:span> ⲟⲥ ϫⲉ ⲥⲉⲛⲁⲁⲙⲁϩⲧⲉ ⲙ̅ⲙⲟⲉⲓ· ⲁⲛⲟⲕ <text:line-break/><text:span text:style-name="T1"> </text:span><text:span text:style-name="T2">(25/12) </text:span> ⲇⲉ ⲟⲩ ⲡⲉϯⲛⲁϣ ⲁⲁϥ· ⲡⲉϫⲁϥ ⲛⲁⲓ̈ <text:line-break/><text:span text:style-name="T1"> </text:span><text:span text:style-name="T2">(25/13) </text:span> ϫⲉ ⲙ̅ⲡⲣ̅ⲣ̅ ϩⲟⲧⲉ ⲓ̈ⲁⲕⲱⲃⲟⲥ· ⲛ̅‐ <text:line-break/><text:span text:style-name="T1"> </text:span><text:span text:style-name="T2">(25/14) </text:span> ⲧⲁⲕ ϩⲱⲱⲕ ⲥⲉⲛⲁⲁⲙⲁϩⲧⲉ ⲙ̅‐ <text:line-break/><text:span text:style-name="T1"> </text:span><text:span text:style-name="T2">(25/15) </text:span> ⲙⲟⲕ· ⲁⲗⲗⲁ ⲡⲱⲣϫ̅ ⲉⲃⲟⲗ ⲛ̅ⲑ̅ⲓ̅ⲏ̅ⲙ̅·̅ <text:line-break/><text:span text:style-name="T1"> </text:span><text:span text:style-name="T2">(25/16) </text:span> ⲧⲁⲓ̈ ⲅⲁⲣ ⲧⲉⲧ’ϯ ⲙ̅ⲡⲁⲡⲟⲧ’ ⲙ̅ⲡⲥⲓ‐ <text:line-break/><text:span text:style-name="T1"> </text:span><text:span text:style-name="T2">(25/17) </text:span> ϣⲉ ⲛ̅ⲟⲩⲟⲉⲓϣ ⲛⲓⲙ ⲛ̅ⲛ̅ϣⲏⲣⲉ ⲛ̅‐ <text:line-break/><text:span text:style-name="T1"> </text:span><text:span text:style-name="T2">(25/18) </text:span> ⲧⲉ ⲡⲟⲩⲟⲉⲓⲛ· ⲟⲩⲙⲁ ⲛ̅ϣⲱⲡⲉ <text:line-break/><text:span text:style-name="T1"> </text:span><text:span text:style-name="T2">(25/19) </text:span> ⲡⲉ ⲛ̅ⲛⲟⲩⲏⲡⲉ ⲛ̅ⲛⲁⲣⲭⲱⲛ· <text:line-break/><text:span text:style-name="T1"> </text:span><text:span text:style-name="T2">(25/20) </text:span> ⲁⲗⲗⲁ ⲡⲉⲕⲥⲱⲧⲉ ⲛⲁⲥⲱⲧⲉ <text:line-break/><text:span text:style-name="T1"> </text:span><text:span text:style-name="T2">(25/21) </text:span> ⲉⲃⲟⲗ ⲙ̅ⲙⲟⲟⲩ· ϫⲉⲕⲁⲁⲥ ⲉ̣‐ <text:line-break/><text:span text:style-name="T1"> </text:span><text:span text:style-name="T2">(25/22) </text:span> ⲕⲉⲙ̅ⲙⲉ ϫⲉ ⲛⲓⲙ ⲛⲉ· ⲁ[ⲩⲱ ϫⲉ] <text:line-break/><text:span text:style-name="T1"> </text:span><text:span text:style-name="T2">(25/23) </text:span> ϩⲉⲛⲁϣ ⲙ̅ⲙⲓⲛⲉ ⲛⲉ ⲕⲛⲁⲡ[ <text:line-break/><text:span text:style-name="T1"> </text:span><text:span text:style-name="T2">(25/24) </text:span> ⲁⲩⲱ ⲥⲱⲧⲙ̅ ⲛ̅ⲧⲟⲟⲩ [ <text:line-break/><text:span text:style-name="T1"> </text:span><text:span text:style-name="T2">(25/25) </text:span> ⲁⲛ ⲁⲗⲗⲁ ϩⲉⲛⲁⲣ̣[ⲭⲱⲛ <text:line-break/><text:soft-page-break/><text:span text:style-name="T1"> </text:span><text:span text:style-name="T2">(25/26) </text:span> ⲡⲓⲙⲛ̅ⲧ’ⲥ̣[ⲛ]ⲟ̣ⲟ̣ⲩⲥ̣ [ <text:line-break/><text:span text:style-name="T1"> </text:span><text:span text:style-name="T2">(25/27) </text:span> ⲛ̅ⲧⲟⲩⲛ̣̅[....]ⲉ̣ [....ⲉⲡⲉ] <text:line-break/><text:span text:style-name="T1"> </text:span><text:span text:style-name="T2">(25/28) </text:span> ⲥⲏⲧ’[ <text:line-break/><text:span text:style-name="T1"> </text:span><text:span text:style-name="T2">(25/29) </text:span> ⲁⲣⲭ[ⲱⲛ <text:line-break/><text:span text:style-name="T1"> </text:span><text:span text:style-name="T2">(25/30) </text:span> ⲡⲟⲩ[ <text:line-break/><text:span text:style-name="T1"> </text:span><text:span text:style-name="T2">(26/1) </text:span> ⲉϩⲣⲁⲓ̈ ⲉϫⲛ̅ ⲧⲉⲧⲉ ⲧⲱϥ ⲛ̅ϩⲉⲃⲇⲟⲙⲁⲥ· <text:line-break/><text:span text:style-name="T1"> </text:span><text:span text:style-name="T2">(26/2) </text:span> ⲡ̣ⲉϫⲉ ⲓ̈ⲁⲕⲱⲃⲟⲥ ϫⲉ ⲁⲣⲁ ⲟⲩⲛ ϩⲣⲁⲃ‐ <text:line-break/><text:span text:style-name="T1"> </text:span><text:span text:style-name="T2">(26/3) </text:span> ⲃ̣ⲉⲓ ⲙⲛ̅ⲧⲥⲛⲟⲟⲩⲥ ⲛ̅ϩⲉⲃⲇⲟⲙⲁⲥ ⲛⲉ <text:line-break/><text:span text:style-name="T1"> </text:span><text:span text:style-name="T2">(26/4) </text:span> ⲁⲩⲱ ⲥⲁϣϥⲉ ⲉⲛ ϭⲉ ⲛⲉ ⲛ̅ⲑⲉ ⲉ‐ <text:line-break/><text:span text:style-name="T1"> </text:span><text:span text:style-name="T2">(26/5) </text:span> ⲧⲟⲩϣⲟⲟⲡ’ ϩⲛ̅ ⲛⲉⲅⲣⲁⲫⲏ· ⲡⲉϫⲉ <text:line-break/><text:span text:style-name="T1"> </text:span><text:span text:style-name="T2">(26/6) </text:span> ⲡϫⲟⲉⲓⲥ ϫⲉ ⲓ̈ⲁⲕⲱⲃⲟⲥ ⲡⲉⲧⲁ→ϥ←ϣⲁϫⲉ <text:line-break/><text:span text:style-name="T1"> </text:span><text:span text:style-name="T2">(26/7) </text:span> ϩⲁ ⲧⲉⲓ̈ⲅⲣⲁⲫⲏ ⲛ̅ⲧⲁϥⲥⲟⲟⲩⲛ ϣⲁ <text:line-break/><text:span text:style-name="T1"> </text:span><text:span text:style-name="T2">(26/8) </text:span> ⲡⲉⲓ̈ⲙⲁ· ⲁⲛⲟⲕ ⲇⲉ ϯⲛⲁϭⲱⲗⲡ̅’· ⲛⲁⲕ <text:line-break/><text:span text:style-name="T1"> </text:span><text:span text:style-name="T2">(26/9) </text:span> ⲉⲃⲟⲗ ⲙ̅ⲡⲏ ⲉⲧⲁϥ{ⲉ̅ⲓ} ⲉⲃⲟⲗ ϩⲙ̅ ⲡⲓⲁⲧ’‐ <text:line-break/><text:span text:style-name="T1"> </text:span><text:span text:style-name="T2">(26/10) </text:span> ϯ →ⲏ←ⲡⲉ ⲉⲣⲟϥ· ϯⲛⲁϯ ⲙⲁⲉⲓⲛ ϩⲁ ⲧⲉⲩ‐ <text:line-break/><text:span text:style-name="T1"> </text:span><text:span text:style-name="T2">(26/11) </text:span> ⲏⲡⲉ· ⲡⲉⲛⲧⲁϥ{ⲉ̅ⲓ} ⲉⲃⲟⲗ ϩⲙ̅ ⲡⲓⲁⲧ’‐ <text:line-break/><text:span text:style-name="T1"> </text:span><text:span text:style-name="T2">(26/12) </text:span> ϯ ϣⲓ ⲉⲣⲟϥ· ϯⲛⲁϯ ⲙⲁⲉⲓⲛ ϩⲁ ⲡⲉⲩ‐ <text:line-break/><text:span text:style-name="T1"> </text:span><text:span text:style-name="T2">(26/13) </text:span> ϯ ϣⲓ· ⲡⲉϫⲉ ⲓ̈ⲁⲕⲱⲃⲟⲥ ϫⲉ ⲁⲣⲁ <text:line-break/><text:span text:style-name="T1"> </text:span><text:span text:style-name="T2">(26/14) </text:span> ⲟⲩⲛ ϩⲣⲁⲃⲃⲓ· ⲉⲓⲥ ϩⲏⲏⲧⲉ ⲁⲓ̈ϫⲓ ⲛ̅‐ <text:line-break/><text:span text:style-name="T1"> </text:span><text:span text:style-name="T2">(26/15) </text:span> ⲧⲉⲩⲏⲡⲉ ϣⲃⲉⲥⲛⲟⲟⲩⲥ ⲛ̅ϣⲁ‐ <text:line-break/><text:span text:style-name="T1"> </text:span><text:span text:style-name="T2">(26/16) </text:span> ϣⲟⲩ ⲛⲉ· ⲡⲉϫⲉ ⲡϫⲟⲉⲓⲥ ϫⲉ ⲛⲁⲓ̈ <text:line-break/><text:span text:style-name="T1"> </text:span><text:span text:style-name="T2">(26/17) </text:span> ⲛⲉ ϯϣⲃⲉⲥⲛⲟⲟⲩⲥ ⲙ̅ⲡⲉ ⲉⲧⲉ <text:line-break/><text:span text:style-name="T1"> </text:span><text:span text:style-name="T2">(26/18) </text:span> ⲛ̅ⲕⲟⲩⲉⲓ ⲛ̅ⲧⲉⲩ →ⲛⲉⲓ̈← ⲛⲉ ⲛⲓϭⲁⲙ ⲛ̅ⲧⲉ <text:line-break/><text:span text:style-name="T1"> </text:span><text:span text:style-name="T2">(26/19) </text:span> ⲡⲉⲩⲁⲙⲁϩⲧⲉ ⲧⲏⲣⲟⲩ· ⲁⲩⲱ ⲁⲩ‐ <text:line-break/><text:span text:style-name="T1"> </text:span><text:span text:style-name="T2">(26/20) </text:span> ⲱϩⲉ ⲉⲣⲁⲧⲟⲩ ⲉⲃⲟⲗ {ϩ̅ⲓ}ⲧⲟⲟⲧⲟⲩ· <text:line-break/><text:span text:style-name="T1"> </text:span><text:span text:style-name="T2">(26/21) </text:span> ⲁⲩⲱ ⲛⲁⲓ̈ ⲛⲉ ⲛⲏ ⲉⲧⲁⲩⲡⲱϣ <text:line-break/><text:span text:style-name="T1"> </text:span><text:span text:style-name="T2">(26/22) </text:span> ϩⲙ̣̅ ⲙⲁ ⲛⲓⲙ· ⲉⲩϣⲟⲟⲡ’ ϩⲁ ⲧⲉ‐ <text:line-break/><text:span text:style-name="T1"> </text:span><text:span text:style-name="T2">(26/23) </text:span> [ⲝⲟⲩⲥⲓ]ⲁ ⲙ̅ⲡⲓⲙⲛ̅ⲧⲥⲛⲟⲟⲩⲥ ⲛ̅ⲁⲣ‐ <text:line-break/><text:span text:style-name="T1"> </text:span><text:span text:style-name="T2">(26/24) </text:span> [ⲭ]ⲱ̣ⲛ· ϯⲕⲟⲩⲉⲓ ⲛ̅ϭⲟⲙ ⲉⲧⲛ̅ϩⲏⲧⲟⲩ <text:line-break/><text:span text:style-name="T1"> </text:span><text:span text:style-name="T2">(26/25) </text:span> [ⲁⲥϫⲡ]ⲟ ⲛⲁⲥ ⲛ̅ϩⲉⲛⲁⲅ’ⲅⲉⲗⲟⲥ <text:line-break/><text:span text:style-name="T1"> </text:span><text:span text:style-name="T2">(26/26) </text:span> [ⲙⲛ̅ ϩⲉⲛⲥⲧ]ⲣⲁⲧⲓⲁ ⲛ̣̅ⲛⲁⲧ’ϯ ⲏⲡⲉ <text:line-break/><text:span text:style-name="T1"> </text:span><text:span text:style-name="T2">(26/27) </text:span> [ⲉⲣⲟⲟⲩ ⲡ]ⲉ[ⲧϣⲟ]ⲟⲡ’ ⲇⲉ ⲁⲩϯ <text:line-break/><text:span text:style-name="T1"> </text:span><text:span text:style-name="T2">(26/28) </text:span> [ 7+-]ⲛ[....]ⲩ· ⲉⲧⲃⲉ <text:line-break/><text:span text:style-name="T1"> </text:span><text:span text:style-name="T2">(26/29) </text:span> [ 9+- ⲡⲉ]ⲧ’̣ϣⲟⲟⲡ’ <text:line-break/><text:span text:style-name="T1"> </text:span><text:span text:style-name="T2">(26/30) </text:span> [ 8+- ⲛⲁⲧϯ] ⲏⲡⲉ ⲉⲣⲟⲟⲩ <text:line-break/><text:span text:style-name="T1"> </text:span><text:span text:style-name="T2">(27/1) </text:span> ⲛⲉ· ⲉϣⲱⲡⲉ ⲉⲕϣⲁⲛⲟⲩⲱϣ̣ <text:line-break/><text:span text:style-name="T1"> </text:span><text:span text:style-name="T2">(27/2) </text:span> ⲉϯ ⲏⲡⲉ ⲉⲣⲟⲟⲩ ϯⲛⲟⲩ· ⲛ̅ⲕⲛ[ⲁ]‐ <text:line-break/><text:span text:style-name="T1"> </text:span><text:span text:style-name="T2">(27/3) </text:span> ϭⲛ̅ϭⲟⲙ ⲁⲛ ϣⲁⲛⲧⲉⲕ→ⲛ←ⲟ→ⲩ←ϫⲉ ⲉ[ⲃ]ⲟ̣ⲗ <text:line-break/><text:span text:style-name="T1"> </text:span><text:span text:style-name="T2">(27/4) </text:span> ⲙ̅ⲙⲟⲕ ⲛ̅ϯⲇⲓⲁⲛⲟⲓⲁ ⲛ̅ⲃⲉⲗⲗⲏ· <text:line-break/><text:span text:style-name="T1"> </text:span><text:span text:style-name="T2">(27/5) </text:span> ⲡⲉⲓ̈ⲥⲛⲁϩ ⲉⲧ’ⲕⲱⲧⲉ ⲉⲣⲟⲕ ⲛ̅ⲧⲉ <text:line-break/><text:span text:style-name="T1"> </text:span><text:span text:style-name="T2">(27/6) </text:span> ⲧⲥⲁⲣⲁⲝ· ⲁⲩⲱ ⲧⲟⲧⲉ ⲉⲕⲛⲁⲕⲁ‐ <text:line-break/><text:span text:style-name="T1"> </text:span><text:span text:style-name="T2">(27/7) </text:span> ⲧⲁⲛⲧⲁ ⲉϩⲣⲁⲓ̈ ⲉⲡⲉⲧ’ϣⲟⲟⲡ’· <text:line-break/><text:span text:style-name="T1"> </text:span><text:span text:style-name="T2">(27/8) </text:span> ⲁⲩⲱ ⲕⲛⲁϣⲱⲡⲉ ⲁⲛ ϭⲉ ⲉⲛⲧⲕ̅ <text:line-break/><text:span text:style-name="T1"> </text:span><text:span text:style-name="T2">(27/9) </text:span> ⲓ̈ⲁⲕⲱⲃⲟⲥ ⲁⲛ· ⲁⲗⲗⲁ ⲛ̅ⲧⲟⲕ ⲡⲉ <text:line-break/><text:span text:style-name="T1"> </text:span><text:span text:style-name="T2">(27/10) </text:span> ⲡⲏ ⲉⲧ’ϣⲟⲟⲡ’· ⲁⲩⲱ ⲛⲓⲁⲧ’ϯ <text:line-break/><text:span text:style-name="T1"> </text:span><text:span text:style-name="T2">(27/11) </text:span> ⲏⲡⲉ ⲉⲣⲟⲟⲩ ⲧⲏⲣⲟⲩ ⲉⲩⲉϣⲱ‐ <text:line-break/><text:span text:style-name="T1"> </text:span><text:span text:style-name="T2">(27/12) </text:span> ⲡⲉ ⲉⲁⲩϯ ⲣⲁⲛ ⲉⲣⲟⲟⲩ ⲧⲏⲣⲟⲩ· <text:line-break/><text:soft-page-break/><text:span text:style-name="T1"> </text:span><text:span text:style-name="T2">(27/13) </text:span> 〈ⲡⲉϫⲉ ⲓ̈ⲁⲕⲱⲃⲟⲥ ϫⲉ ⲁⲣⲁ ⲟⲩⲛ〉 <text:line-break/><text:span text:style-name="T1"> </text:span><text:span text:style-name="T2">(27/14) </text:span> ϩⲣⲁⲃⲃⲓ ⲛ̅ⲁϣ ⲛ̅ϩⲉ ϯⲛⲁⲕⲁⲧⲁⲛ‐ <text:line-break/><text:span text:style-name="T1"> </text:span><text:span text:style-name="T2">(27/15) </text:span> ⲧⲁ ⲉϩⲣⲁⲓ̈ ⲉⲡⲉⲧ’ϣⲟⲟⲡ’ ⲉⲣⲉ‐ <text:line-break/><text:span text:style-name="T1"> </text:span><text:span text:style-name="T2">(27/16) </text:span> ⲛⲉⲓ̈ϭⲟⲙ ⲧⲏⲣⲟⲩ ⲙⲛ̅ ⲛⲉⲉⲓ‐ <text:line-break/><text:span text:style-name="T1"> </text:span><text:span text:style-name="T2">(27/17) </text:span> ⲥⲧⲣⲁⲧⲓⲁ ⲉⲩϩⲏⲕ ⲟⲩⲃⲏⲉⲓ· <text:line-break/><text:span text:style-name="T1"> </text:span><text:span text:style-name="T2">(27/18) </text:span> ⲡⲉϫⲁϥ ⲛⲁⲓ̈ ϫⲉ ⲉⲣⲉ ⲛⲉⲓ̈ϭⲟⲙ <text:line-break/><text:span text:style-name="T1"> </text:span><text:span text:style-name="T2">(27/19) </text:span> ϩⲏⲕ ⲟⲩⲃⲏⲕ ⲟⲩⲁⲁⲕ ⲁⲛ· <text:line-break/><text:span text:style-name="T1"> </text:span><text:span text:style-name="T2">(27/20) </text:span> ⲁⲗⲗⲁ ⲉⲩϩⲏⲕ ⲟⲩⲃⲉ ϭⲉ· <text:line-break/><text:span text:style-name="T1"> </text:span><text:span text:style-name="T2">(27/21) </text:span> ⲉⲣⲉ ⲛⲉⲓ̈ϭⲟⲙ ϩⲏⲕ ⲟⲩⲃⲏⲉⲓ <text:line-break/><text:span text:style-name="T1"> </text:span><text:span text:style-name="T2">(27/22) </text:span> ⲁⲩⲱ ⲥⲉϩⲏⲕ ⲙⲛ̅ ⲕⲉϭ̣[ⲟⲙ] <text:line-break/><text:span text:style-name="T1"> </text:span><text:span text:style-name="T2">(27/23) </text:span> ⲁⲗⲗⲁ ⲉⲩϩⲏⲕ ⲟⲩⲃⲏⲉⲓ [ϩⲛ̅] <text:line-break/><text:span text:style-name="T1"> </text:span><text:span text:style-name="T2">(27/24) </text:span> ⲟⲩⲕⲣⲓⲥⲓⲥ ⲙ̅ⲡⲟⲩϯ[ <text:line-break/><text:span text:style-name="T1"> </text:span><text:span text:style-name="T2">(27/25) </text:span> ⲉⲣⲟⲓ̈ ⲛ̅ϩⲏⲧⲥ̅ ⲉⲃⲟ[ⲗ <text:line-break/><text:span text:style-name="T1"> </text:span><text:span text:style-name="T2">(27/26) </text:span> ⲉⲃⲟⲗ {ϩ̅ⲓ}ⲧⲟⲟⲧⲟⲩ [ <text:line-break/><text:span text:style-name="T1"> </text:span><text:span text:style-name="T2">(27/27) </text:span> ⲁⲓ̈ ⲙ̅ⲡⲉⲓ̈ⲙⲁ ϣⲁ̣[ <text:line-break/><text:span text:style-name="T1"> </text:span><text:span text:style-name="T2">(27/28) </text:span> ⲙ̅ⲕ̣ⲟⲟϩ ϯⲛⲁⲕ̣ⲁ̣.[ <text:line-break/><text:span text:style-name="T1"> </text:span><text:span text:style-name="T2">(27/29) </text:span> ϩⲏⲧⲟ̣[ⲩ..]ⲛ ⲉϥⲉⲛ̅[ <text:line-break/><text:span text:style-name="T1"> </text:span><text:span text:style-name="T2">(28/1) </text:span> ⲟⲩⲧⲉ ⲛ̅ϯⲛⲁⲥⲁϩⲱⲟⲩ ⲁⲛ· ⲉⲥⲉ‐ <text:line-break/><text:span text:style-name="T1"> </text:span><text:span text:style-name="T2">(28/2) </text:span> ϣⲱⲡⲉ ⲇⲉ ⲛ̅ϩⲏⲧ’ ⲛ̅ϭⲓ ⲟⲩⲥⲓⲅⲏ ⲙⲛ̅ <text:line-break/><text:span text:style-name="T1"> </text:span><text:span text:style-name="T2">(28/3) </text:span> [ⲟ]ⲩⲙⲩⲥⲧⲏⲣⲓⲟⲛ ⲉϥϩⲏⲡ’· ⲁⲗⲗⲁ ϯ‐ <text:line-break/><text:span text:style-name="T1"> </text:span><text:span text:style-name="T2">(28/4) </text:span> ⲉ ⲛ̅ϭⲁⲃϩⲏⲧ’ ϩⲁⲑⲏ ⲙ̅ⲡⲉⲩⲃⲱⲗⲕ̅· <text:line-break/><text:span text:style-name="T1"> </text:span><text:span text:style-name="T2">(28/5) </text:span> ⲡⲉϫⲉ ⲓ̈ⲁⲕⲱⲃⲟⲥ ϫⲉ ϩⲣⲁⲃⲃⲓ· ⲉϣ‐ <text:line-break/><text:span text:style-name="T1"> </text:span><text:span text:style-name="T2">(28/6) </text:span> ϫⲉ ⲥⲉⲛⲁϩⲟⲕⲟⲩ ⲟⲩⲃⲏⲕ· ⲉⲓ̈ⲉ ⲙⲛ̅ <text:line-break/><text:span text:style-name="T1"> </text:span><text:span text:style-name="T2">(28/7) </text:span> ⲁⲣⲓⲕⲉ ⲁⲕ{ⲉ̅ⲓ} ϩⲛ ⲟⲩⲅⲛⲱⲥⲓⲥ· ϫⲉ ⲉ‐ <text:line-break/><text:span text:style-name="T1"> </text:span><text:span text:style-name="T2">(28/8) </text:span> ⲕⲉⲥⲟϩⲉ →ⲛ̅←ⲧⲉⲩⲃ̅ϣⲉ· ⲁⲕⲉⲓ ϩⲛ̅ ⲟⲩ‐ <text:line-break/><text:span text:style-name="T1"> </text:span><text:span text:style-name="T2">(28/9) </text:span> ⲙⲛⲏⲙⲏ ϫⲉ ⲉⲕⲉⲥⲁϩⲉ ⲧⲉⲩⲙⲛ̅ⲧ’‐ <text:line-break/><text:span text:style-name="T1"> </text:span><text:span text:style-name="T2">(28/10) </text:span> ⲁⲧⲥⲟⲟⲩⲛ· ⲁⲗⲗⲁ ⲛⲉⲓ̈ϥⲓ ⲣⲟⲟⲩϣ <text:line-break/><text:span text:style-name="T1"> </text:span><text:span text:style-name="T2">(28/11) </text:span> ⲉⲧⲃⲏⲏⲧⲕ̅· ⲁⲕⲉⲓ ⲅⲁⲣ ⲉϩⲣⲁⲓ̈ ⲉⲩ‐ <text:line-break/><text:span text:style-name="T1"> </text:span><text:span text:style-name="T2">(28/12) </text:span> ⲛⲟϭ ⲙ̅ⲙⲛ̅ⲧ’ⲁⲧⲙ̅ⲙⲉ· ⲁⲗⲗⲁ ⲙ̅‐ <text:line-break/><text:span text:style-name="T1"> </text:span><text:span text:style-name="T2">(28/13) </text:span> ⲡⲉⲕⲧⲱⲗⲙ̅ ⲉⲗⲁⲁⲩ ϩⲣⲁⲓ̈ ⲛ̅ϩⲏⲧⲥ̅· <text:line-break/><text:span text:style-name="T1"> </text:span><text:span text:style-name="T2">(28/14) </text:span> ⲁⲕⲉⲓ ⲅⲁⲣ ⲉϩⲣⲁⲓ̈ ⲉⲩⲙⲛ̅ⲧ’ⲁⲧⲙⲉⲉⲩⲉ <text:line-break/><text:span text:style-name="T1"> </text:span><text:span text:style-name="T2">(28/15) </text:span> ⲁⲩⲱ ⲛⲉⲣⲉ ϯⲙⲛⲏⲙⲏ ⲛⲉⲥⲙⲏⲛ <text:line-break/><text:span text:style-name="T1"> </text:span><text:span text:style-name="T2">(28/16) </text:span> ⲉⲣⲟⲕ· ⲁⲕⲙⲟⲟϣⲉ ϩⲛ̅ ⲟⲩⲟⲙⲉ <text:line-break/><text:span text:style-name="T1"> </text:span><text:span text:style-name="T2">(28/17) </text:span> ⲁⲩⲱ ⲙ̅ⲡⲟⲩⲧⲱⲗⲙ̅ ⲛ̅ϭⲓ ⲛⲉⲕϩⲟ‐ <text:line-break/><text:span text:style-name="T1"> </text:span><text:span text:style-name="T2">(28/18) </text:span> ⲉⲓⲧⲉ· ⲟⲩⲧⲉ ⲙ̅ⲡⲉⲕⲧⲱⲙⲥ̅ <text:line-break/><text:span text:style-name="T1"> </text:span><text:span text:style-name="T2">(28/19) </text:span> ϩⲛ̅ ⲧⲉⲩⲗⲁⲉⲓϩⲉ· ⲟⲩⲧⲉ ⲛⲉⲩⲧⲁ‐ <text:line-break/><text:span text:style-name="T1"> </text:span><text:span text:style-name="T2">(28/20) </text:span> ϩⲟ ⲙ̅ⲙⲟⲕ ⲁⲛ· ⲁⲩⲱ ⲛⲉⲓ̈ϣⲟⲟⲡ’ <text:line-break/><text:span text:style-name="T1"> </text:span><text:span text:style-name="T2">(28/21) </text:span> ⲛ̅ⲧⲉⲩϩⲏ ⲁⲛ· ⲁⲗⲗⲁ ⲁⲓ̈ϯ ϩⲱⲃ <text:line-break/><text:span text:style-name="T1"> </text:span><text:span text:style-name="T2">(28/22) </text:span> ⲛⲓⲙ ⲛ̅ⲧⲉⲩ {ϩ̅ⲓ}ⲱⲧ· →ⲥ̅←ϣⲟⲟⲡ’ ⲛ̅ϩⲏⲧ’ <text:line-break/><text:span text:style-name="T1"> </text:span><text:span text:style-name="T2">(28/23) </text:span> [ⲛ̅ϭⲓ ⲟ]ⲩ̣ⲃ̅ϣⲉ· ⲁⲩⲱ ϯⲉⲓⲣⲉ ⲙ̅‐ <text:line-break/><text:span text:style-name="T1"> </text:span><text:span text:style-name="T2">(28/24) </text:span> [ⲡⲙⲉ]ⲉⲩⲉ ⲛ̅ⲛⲉⲧⲉ ⲛⲱⲟⲩ ⲁⲛ· <text:line-break/><text:span text:style-name="T1"> </text:span><text:span text:style-name="T2">(28/25) </text:span> [ⲥϣⲟⲟ]ⲡ̣ ⲛ̅ϩⲏⲧ’ ⲛ̅ϭⲓ ⲟⲩⲙⲛ̅ⲧ’ <text:line-break/><text:span text:style-name="T1"> </text:span><text:span text:style-name="T2">(28/26) </text:span> [.....] ⲁ̣ⲩⲱ ϯϩⲛ̅ ⲧⲉⲩⲙⲛ̅ⲧ’ <text:line-break/><text:span text:style-name="T1"> </text:span><text:span text:style-name="T2">(28/27) </text:span> [ 6+-]ⲁⲓ̈ϩⲉ ⲛ̅ⲛⲟⲩⲅⲛⲱⲥⲓⲥ <text:line-break/><text:span text:style-name="T1"> </text:span><text:span text:style-name="T2">(28/28) </text:span> [.....]ⲁ̣ⲓ̈ ⲁⲛ ϩⲁ ⲛⲉⲩⲙ̅ⲕⲟⲟϩ <text:line-break/><text:span text:style-name="T1"> </text:span><text:span text:style-name="T2">(28/29) </text:span> [.....]ⲗ̣· ⲁⲗⲗ̣ⲁ̣ ⲁⲉⲓⲣ̅ ϩⲟⲧⲉ <text:line-break/><text:span text:style-name="T1"> </text:span><text:span text:style-name="T2">(28/30) </text:span> [ⲛ̅ϩⲏⲧⲟ]ⲩ̣ ⲉⲩⲁⲙ[ⲁϩ]ⲧ̣ⲉ ϫⲉ ⲟⲩ <text:line-break/><text:soft-page-break/><text:span text:style-name="T1"> </text:span><text:span text:style-name="T2">(29/1) </text:span> ⲡⲉⲧⲟⲩⲛⲁⲁⲁϥ· ⲟⲩ ⲡⲉϯⲛⲁϣ <text:line-break/><text:span text:style-name="T1"> </text:span><text:span text:style-name="T2">(29/2) </text:span> ϫⲟⲟϥ· ⲏ%0 ⲁϣ ⲛ̅ϣⲁϫⲉ ⲡⲉϯⲛⲁϣ̣ <text:line-break/><text:span text:style-name="T1"> </text:span><text:span text:style-name="T2">(29/3) </text:span> ϫⲟⲟϥ· ϣⲁⲛϯⲣ̅ ⲃⲟⲗ ⲉⲣⲟⲟⲩ· ⲡⲉϫ̣[ⲉ] <text:line-break/><text:span text:style-name="T1"> </text:span><text:span text:style-name="T2">(29/4) </text:span> ⲡϫⲟⲉⲓⲥ ϫⲉ ⲓ̈ⲁⲕⲱⲃⲟⲥ ϯⲧⲙⲁⲉⲓⲟ <text:line-break/><text:span text:style-name="T1"> </text:span><text:span text:style-name="T2">(29/5) </text:span> ⲛ̅ⲧⲉⲕⲇⲓⲁⲛⲟⲓⲁ ⲙⲛ̅ ⲧⲉⲕϩⲟⲧⲉ· <text:line-break/><text:span text:style-name="T1"> </text:span><text:span text:style-name="T2">(29/6) </text:span> ⲉϣⲱⲡⲉ ⲉⲕⲙⲏⲛ ⲉⲕⲉⲗⲫⲓⲗⲟⲡⲟ· <text:line-break/><text:span text:style-name="T1"> </text:span><text:span text:style-name="T2">(29/7) </text:span> ⲛⲓ ⲙ̅ⲡⲣ̅ⲧⲉⲥⲣ̅ⲙⲉⲗⲓ ⲛⲁⲕ ϩⲁ ⲕⲉⲟⲩⲁ <text:line-break/><text:span text:style-name="T1"> </text:span><text:span text:style-name="T2">(29/8) </text:span> ⲉⲓ ⲙⲏⲧⲓ ⲉⲧⲃⲉ ⲡⲉⲕⲥⲱⲧⲉ· ⲉⲓⲥ <text:line-break/><text:span text:style-name="T1"> </text:span><text:span text:style-name="T2">(29/9) </text:span> ϩⲏⲏⲧⲉ ⲅⲁⲣ ϯⲛⲁϫⲱⲕ ⲡⲉⲓ̈ⲕⲗⲏⲣⲟⲥ <text:line-break/><text:span text:style-name="T1"> </text:span><text:span text:style-name="T2">(29/10) </text:span> ⲉⲃⲟⲗ {ϩ̅ⲓ}ϫⲙ̅ ⲡⲉⲓ̈ⲕⲁϩ· ⲕⲁⲧⲁ ⲑⲉ <text:line-break/><text:span text:style-name="T1"> </text:span><text:span text:style-name="T2">(29/11) </text:span> ⲉⲧⲁⲓ̈ϫⲟⲟⲥ ⲉⲃⲟⲗ ϩⲛ̅ ⲙ̅ⲡⲏⲟⲩⲉ· <text:line-break/><text:span text:style-name="T1"> </text:span><text:span text:style-name="T2">(29/12) </text:span> ⲁⲩⲱ ϯⲛⲁϭⲱⲗⲡ’ ⲛⲁⲕ ⲉⲃⲟⲗ ⲙ̅‐ <text:line-break/><text:span text:style-name="T1"> </text:span><text:span text:style-name="T2">(29/13) </text:span> ⲡⲉⲕⲥⲱⲧⲉ· ⲡⲉϫⲉ ⲓ̈ⲁⲕⲱⲃⲟⲥ <text:line-break/><text:span text:style-name="T1"> </text:span><text:span text:style-name="T2">(29/14) </text:span> ϫⲉ ϩⲣⲁⲃⲃⲓ ⲡⲱⲥ ⲙⲛ̅ⲛ̅ⲥⲁ ⲛⲁⲓ̈ <text:line-break/><text:span text:style-name="T1"> </text:span><text:span text:style-name="T2">(29/15) </text:span> ⲕⲛⲁⲟⲩⲱⲛϩ̅ ⲛⲁⲛ ⲉⲃⲟⲗ ⲁⲛ· <text:line-break/><text:span text:style-name="T1"> </text:span><text:span text:style-name="T2">(29/16) </text:span> ⲙⲛ̅ⲛ̅ⲥⲁ ⲥⲉⲁⲙⲁϩⲧⲉ ⲙ̅ⲙⲟⲕ <text:line-break/><text:span text:style-name="T1"> </text:span><text:span text:style-name="T2">(29/17) </text:span> ⲁⲩⲱ ⲕϫⲱⲕ ⲙ̅ⲡⲉⲓ̈ⲕⲗⲏⲣⲟⲥ ⲉⲃⲟⲗ <text:line-break/><text:span text:style-name="T1"> </text:span><text:span text:style-name="T2">(29/18) </text:span> ⲁⲩⲱ ⲕⲛⲁⲃⲱⲕ ⲉϩⲣⲁⲓ̈ ⲉⲡⲉⲧ’ϣⲟ‐ <text:line-break/><text:span text:style-name="T1"> </text:span><text:span text:style-name="T2">(29/19) </text:span> ⲟⲡ’· ⲡⲉϫⲉ ⲡϫⲟⲉⲓⲥ ϫⲉ ⲓ̈ⲁⲕⲱⲃⲟⲥ <text:line-break/><text:span text:style-name="T1"> </text:span><text:span text:style-name="T2">(29/20) </text:span> ⲙⲛ̅ⲛ̅ⲥⲁ ⲛⲁⲓ̈ ϯⲛⲁⲟⲩⲱⲛϩ̅ ⲛⲁⲕ <text:line-break/><text:span text:style-name="T1"> </text:span><text:span text:style-name="T2">(29/21) </text:span> ⲉⲃⲟⲗ ⲛ̅ϩⲱⲃ ⲛⲓⲙ· ⲉⲧⲃⲏⲏⲧⲕ̅ <text:line-break/><text:span text:style-name="T1"> </text:span><text:span text:style-name="T2">(29/22) </text:span> ⲟⲩⲁⲁⲕ ⲁⲛ· ⲁⲗⲗⲁ ⲉⲧⲃ[ⲉ ⲧⲙⲛ̅ⲧ]‐ <text:line-break/><text:span text:style-name="T1"> </text:span><text:span text:style-name="T2">(29/23) </text:span> ⲁⲧⲛⲁϩⲧⲉ ⲛ̅ⲧⲉ ⲛⲓⲣⲱⲙ[ⲉ] <text:line-break/><text:span text:style-name="T1"> </text:span><text:span text:style-name="T2">(29/24) </text:span> ϫⲉⲕⲁⲁⲥ ⲉⲣⲉ ⲟⲩⲡ[ⲓⲥⲧⲓⲥ ⲛⲁ]‐ <text:line-break/><text:span text:style-name="T1"> </text:span><text:span text:style-name="T2">(29/25) </text:span> ϣⲱⲡⲉ ⲛ̅ϩⲏⲧⲟⲩ [ⲟⲩⲛ̅ ⲟⲩ]‐ <text:line-break/><text:span text:style-name="T1"> </text:span><text:span text:style-name="T2">(29/26) </text:span> ⲙⲏⲏϣⲉ ⲅⲁⲣ ⲛⲁⲕ̣[ⲁⲧⲁⲛⲧⲁ] <text:line-break/><text:span text:style-name="T1"> </text:span><text:span text:style-name="T2">(29/27) </text:span> ⲉϩⲣⲁⲓ̈ ⲉⲧⲡⲓⲥⲧ̣[ⲓⲥ ⲁⲩⲱ] <text:line-break/><text:span text:style-name="T1"> </text:span><text:span text:style-name="T2">(29/28) </text:span> ⲥⲉⲛⲁⲁⲓ̈[ⲁ]ⲉⲓ ϩⲣⲁⲓ̣̈ [ϩⲛ̅ <text:line-break/><text:span text:style-name="T1"> </text:span><text:span text:style-name="T2">(29/29) </text:span> ϣⲁⲛ[ 6+-].̅[ <text:line-break/><text:span text:style-name="T1"> </text:span><text:span text:style-name="T2">(30/1) </text:span> [ⲁ]ⲩⲱ ⲙⲛ̅ⲛ̅ⲥⲁ ⲡⲁⲓ̈ ϯⲛⲁⲟⲩⲱⲛϩ̅ <text:line-break/><text:span text:style-name="T1"> </text:span><text:span text:style-name="T2">(30/2) </text:span> ⲉⲩⲥⲟϩⲉ ⲛ̅ⲛⲓⲁⲣⲭⲱⲛ· ⲛ̅ⲧⲁⲟⲩ‐ <text:line-break/><text:span text:style-name="T1"> </text:span><text:span text:style-name="T2">(30/3) </text:span> ⲱ̣ⲛϩ̅ ⲙ̅ⲡⲁⲓ̈ ⲛⲁⲩ ⲉⲃⲟⲗ ϫⲉ ⲟⲩⲁⲧⲉ‐ <text:line-break/><text:span text:style-name="T1"> </text:span><text:span text:style-name="T2">(30/4) </text:span> ⲙⲁϩⲧⲉ ⲙ̅ⲙⲟϥ ⲡⲉ· ⲉϣⲱⲡⲉ ⲉⲩ‐ <text:line-break/><text:span text:style-name="T1"> </text:span><text:span text:style-name="T2">(30/5) </text:span> ϣⲁⲛⲁⲙⲁϩⲧⲉ ⲙ̅ⲙⲟϥ· ⲧⲟⲧⲉ <text:line-break/><text:span text:style-name="T1"> </text:span><text:span text:style-name="T2">(30/6) </text:span> ϣⲁϥⲁⲙⲁϩⲧⲉ {ϩ̅ⲓ}ϫⲛ̅ ⲟⲩⲟⲛ ⲛⲓⲙ· <text:line-break/><text:span text:style-name="T1"> </text:span><text:span text:style-name="T2">(30/7) </text:span> ϯⲛⲟⲩ ⲇⲉ ϯⲛⲁⲃⲱⲕ ⲁⲣⲓ ⲡⲙⲉ‐ <text:line-break/><text:span text:style-name="T1"> </text:span><text:span text:style-name="T2">(30/8) </text:span> ⲉⲩⲉ ⲛ̅ⲛⲉⲛⲧⲁⲓ̈ϫⲟⲟⲩ· ⲁⲩⲱ ⲙⲁ‐ <text:line-break/><text:span text:style-name="T1"> </text:span><text:span text:style-name="T2">(30/9) </text:span> ⲣⲟⲩⲃⲱⲕ ⲉϩⲣⲁⲓ̈ ⲉϩⲏⲧⲕ̅· ⲡⲉϫⲉ <text:line-break/><text:span text:style-name="T1"> </text:span><text:span text:style-name="T2">(30/10) </text:span> ⲓ̈ⲁⲕⲱⲃⲟⲥ ϫⲉ ⲡϫⲟⲉⲓⲥ ϯⲛⲁϭⲉⲡⲏ <text:line-break/><text:span text:style-name="T1"> </text:span><text:span text:style-name="T2">(30/11) </text:span> ⲕⲁⲧⲁ ⲑⲉ ⲉⲧⲁⲕϫⲟⲟⲥ· ⲁϥϣⲛ̅ⲧϥ̅ <text:line-break/><text:span text:style-name="T1"> </text:span><text:span text:style-name="T2">(30/12) </text:span> ϫⲉ ⲡϫⲟⲉⲓⲥ ⲁⲩⲱ ⲁϥϫⲱⲕ ⲉⲃⲟⲗ <text:line-break/><text:span text:style-name="T1"> </text:span><text:span text:style-name="T2">(30/13) </text:span> ⲛ̅ⲛⲏ ⲉⲧⲉϣϣⲉ· ⲓ̈ⲁⲕⲱⲃⲟⲥ ⲛ̅ⲧⲁ‐ <text:line-break/><text:span text:style-name="T1"> </text:span><text:span text:style-name="T2">(30/14) </text:span> ⲣⲉϥⲥⲱⲧⲙ̅ ⲉⲧⲃⲉ ⲛⲉϥⲙ̅ⲕⲟⲟϩ <text:line-break/><text:span text:style-name="T1"> </text:span><text:span text:style-name="T2">(30/15) </text:span> ⲁⲩⲱ ⲁϥⲙ̅ⲕⲁϩ ⲛ̅ϩⲏⲧ’ ⲉⲙⲁⲧⲉ· <text:line-break/><text:span text:style-name="T1"> </text:span><text:span text:style-name="T2">(30/16) </text:span> ⲛⲉⲩϭⲁϣⲧ̅’ ⲉⲃⲟⲗ ϩⲁ ⲡⲧⲩⲡⲟⲥ <text:line-break/><text:span text:style-name="T1"> </text:span><text:span text:style-name="T2">(30/17) </text:span> ⲛ̅ⲧⲉϥϭⲛ̅{ⲉ̅ⲓ}· ⲁϥⲉⲓ ⲇⲉ ⲙⲛ̅ⲛ̅ⲥⲁ <text:line-break/><text:span text:style-name="T1"> </text:span><text:span text:style-name="T2">(30/18) </text:span> ϩⲉⲛϩⲟⲟⲩ· ⲁⲩⲱ ⲓ̈ⲁⲕⲱⲃⲟⲥ <text:line-break/><text:soft-page-break/><text:span text:style-name="T1"> </text:span><text:span text:style-name="T2">(30/19) </text:span> ⲛⲉϥⲙⲟⲟϣⲉ ⲡⲉ {ϩ̅ⲓ}ϫⲙ̅ ⲡⲧⲟⲟⲩ <text:line-break/><text:span text:style-name="T1"> </text:span><text:span text:style-name="T2">(30/20) </text:span> ⲉⲧⲉ ϣⲁⲩⲙⲟⲩⲧⲉ ⲉⲣⲟϥ ϫⲉ ⲅⲁⲩ‐ <text:line-break/><text:span text:style-name="T1"> </text:span><text:span text:style-name="T2">(30/21) </text:span> ⲅⲏⲗⲁⲛ ⲙⲛ̅ ⲛⲉⲧⲉ ⲛⲱϥ ⲙ̅ⲙⲁⲑⲏ‐ <text:line-break/><text:span text:style-name="T1"> </text:span><text:span text:style-name="T2">(30/22) </text:span> ⲧ̣ⲏ̣ⲥ̣ ⲛⲉⲧⲉ ⲛⲉⲩⲥⲱⲧⲙ̅ ⲉⲣⲟϥ <text:line-break/><text:span text:style-name="T1"> </text:span><text:span text:style-name="T2">(30/23) </text:span> [ⲉⲁⲩϩ]ⲱϣ ⲛ̅ϩⲏⲧ’· ⲁⲩⲱ ⲛⲁϥⲛ̅ <text:line-break/><text:span text:style-name="T1"> </text:span><text:span text:style-name="T2">(30/24) </text:span> [..]. ⲙ̅ⲙⲉⲟⲩ ⲛ̅ⲛⲟⲩⲣⲉϥϯ ⲛⲁⲙ <text:line-break/><text:span text:style-name="T1"> </text:span><text:span text:style-name="T2">(30/25) </text:span> [ⲧⲉ ⲉϥ]ϫ̣ⲱ ⲙ̅ⲙⲟⲥ ϫⲉ ⲡⲁⲓ̈ ⲡⲉ <text:line-break/><text:span text:style-name="T1"> </text:span><text:span text:style-name="T2">(30/26) </text:span> [ 7+- ]ⲱ ⲙ̅ⲙⲉϩⲥⲛⲁⲩ· <text:line-break/><text:span text:style-name="T1"> </text:span><text:span text:style-name="T2">(30/27) </text:span> [ⲧⲟⲧⲉ ⲡ]ⲙⲏⲏϣⲉ ⲁϥϫⲱⲱⲣⲉ <text:line-break/><text:span text:style-name="T1"> </text:span><text:span text:style-name="T2">(30/28) </text:span> [ⲉⲃⲟⲗ ⲓ̈ⲁ]ⲕⲱⲃ[ⲟⲥ] ⲇⲉ ⲁϥϣⲱ‐ <text:line-break/><text:span text:style-name="T1"> </text:span><text:span text:style-name="T2">(30/29) </text:span> [ϫⲡ̅....]. ⲙ̣[..]ⲡⲣⲟⲥⲉⲩ‐ <text:line-break/><text:span text:style-name="T1"> </text:span><text:span text:style-name="T2">(30/30) </text:span> [ⲭⲏ 9+- ] ⲛ̅ⲑⲉ ⲉⲧⲉ <text:line-break/><text:span text:style-name="T1"> </text:span><text:span text:style-name="T2">(31/1) </text:span> ⲟⲩⲛ̅ⲧⲁϥ ⲛ̅ⲟⲩⲧⲱⲡ’ ⲙ̅ⲙⲁⲩ <text:line-break/><text:span text:style-name="T1"> </text:span><text:span text:style-name="T2">(31/2) </text:span> ⲁⲩⲱ ⲁϥⲟⲩⲟⲛϩ̅ ⲉⲣⲟϥ ⲛ̅ϭⲓ ⲡϫⲟⲉ̣[ⲓⲥ] <text:line-break/><text:span text:style-name="T1"> </text:span><text:span text:style-name="T2">(31/3) </text:span> ⲛ̅ⲧⲟϥ ⲇⲉ ⲁϥⲕⲁ ⲧⲉⲡⲣⲟⲥⲉⲩⲭ[ⲏ] <text:line-break/><text:span text:style-name="T1"> </text:span><text:span text:style-name="T2">(31/4) </text:span> ⲉⲃⲟⲗ ⲁϥⲙⲁⲗϩ̅ϥ̅ ⲛ̅ϩⲏⲧϥ̅· ⲁϥϯ ⲡⲓ <text:line-break/><text:span text:style-name="T1"> </text:span><text:span text:style-name="T2">(31/5) </text:span> ⲉⲣⲱϥ ⲉϥϫⲱ ⲙ̅ⲙⲟⲥ ϫⲉ ϩⲣⲁⲃⲃⲓ <text:line-break/><text:span text:style-name="T1"> </text:span><text:span text:style-name="T2">(31/6) </text:span> ⲁⲓ̈ϩⲉ ⲉⲣⲟⲕ· ⲁⲉⲓⲥⲱⲧⲙ̅ ⲉⲛⲉⲕ‐ <text:line-break/><text:span text:style-name="T1"> </text:span><text:span text:style-name="T2">(31/7) </text:span> ⲙ̅ⲕⲟⲟϩ ⲉⲧⲁⲕϫⲓⲧⲟⲩ· ⲁⲩⲱ <text:line-break/><text:span text:style-name="T1"> </text:span><text:span text:style-name="T2">(31/8) </text:span> ⲁⲓ̈ⲙ̅ⲕⲁϩ ⲛ̅ϩⲏⲧ’ ⲉⲙⲁⲧⲉ· ⲉⲕⲥⲟ‐ <text:line-break/><text:span text:style-name="T1"> </text:span><text:span text:style-name="T2">(31/9) </text:span> ⲟⲩⲛ ⲛ̅ⲧⲁⲙⲛ̅ⲧ’ϣⲁⲛ→ⲧ←ϩⲏⲧ’· ⲉ‐ <text:line-break/><text:span text:style-name="T1"> </text:span><text:span text:style-name="T2">(31/10) </text:span> ⲧⲃⲉ ⲡⲁⲓ̈ ⲛⲉⲓ̈ⲟⲩⲱϣ ⲉⲓ̈ⲙⲉⲉⲩⲉ <text:line-break/><text:span text:style-name="T1"> </text:span><text:span text:style-name="T2">(31/11) </text:span> ϫⲉ ⲛ̅ⲛⲁⲛⲁⲩ ⲉⲡⲉⲓ̈ⲗⲁⲟⲥ ⲉⲩⲉ‐ <text:line-break/><text:span text:style-name="T1"> </text:span><text:span text:style-name="T2">(31/12) </text:span> ϯ ϩⲁⲡ’ ⲉⲣⲟϥ ⲉⲧⲃⲉ ⲛⲁⲓ̈ ⲛ̅ⲧⲁⲩⲁⲁⲩ· <text:line-break/><text:span text:style-name="T1"> </text:span><text:span text:style-name="T2">(31/13) </text:span> ⲛⲁⲓ̈ ⲅⲁⲣ ⲛ̅ⲧⲁⲩⲁⲁⲩ →ϩⲉⲛ←ⲡⲁⲣⲁ ⲡⲉ‐ <text:line-break/><text:span text:style-name="T1"> </text:span><text:span text:style-name="T2">(31/14) </text:span> ⲧⲉϣϣⲉ ⲛⲉ· ⲡⲉϫⲉ ⲡϫⲟⲉⲓⲥ <text:line-break/><text:span text:style-name="T1"> </text:span><text:span text:style-name="T2">(31/15) </text:span> ϫⲉ ⲓ̈ⲁⲕⲱⲃⲟⲥ ⲙ̅ⲡⲣ̅ⲧⲉⲥⲣ̅ⲙⲉⲗⲓ <text:line-break/><text:span text:style-name="T1"> </text:span><text:span text:style-name="T2">(31/16) </text:span> ⲛⲁⲕ ⲉⲧⲃⲏⲏⲧ ⲟⲩⲇⲉ ⲉⲧⲃⲉ <text:line-break/><text:span text:style-name="T1"> </text:span><text:span text:style-name="T2">(31/17) </text:span> ⲡⲉⲓ̈ⲗⲁⲟⲥ· ⲁⲛⲟⲕ ⲡⲉ ⲡⲏ ⲉⲧⲉ <text:line-break/><text:span text:style-name="T1"> </text:span><text:span text:style-name="T2">(31/18) </text:span> ⲛⲉϥϣⲟⲟⲡ’ ⲛ̅ϩⲏⲧ’· ⲛ̅ⲟⲩⲟⲉⲓϣ <text:line-break/><text:span text:style-name="T1"> </text:span><text:span text:style-name="T2">(31/19) </text:span> ⲛⲓⲙ ⲙ̅ⲡⲓϫⲓ ⲙ̅ⲕⲁϩ ϩⲛ̅ ⲗⲁⲁⲩ· <text:line-break/><text:span text:style-name="T1"> </text:span><text:span text:style-name="T2">(31/20) </text:span> ⲟⲩⲧⲉ ⲙ̅ⲡⲟⲩϯ {ϩ̅ⲓ}ⲥⲉ ⲛⲏⲉⲓ· <text:line-break/><text:span text:style-name="T1"> </text:span><text:span text:style-name="T2">(31/21) </text:span> ⲁⲩⲱ ⲙ̅ⲡⲉ ⲡⲉⲓ̈ⲗⲁⲟⲥ ⲉⲓⲣⲉ <text:line-break/><text:span text:style-name="T1"> </text:span><text:span text:style-name="T2">(31/22) </text:span> ⲛⲁⲓ̈ ⲛ̅ⲗⲁⲁⲩ ⲙ̅ⲡⲉⲧ’ϩⲟⲟⲩ <text:line-break/><text:span text:style-name="T1"> </text:span><text:span text:style-name="T2">(31/23) </text:span> ⲛⲉⲣⲉ ⲡⲁⲓ̈ ⲇⲉ ⲕⲏ ⲉϩⲣⲁ̣[ⲓ̈ ⲛ̅]‐ <text:line-break/><text:span text:style-name="T1"> </text:span><text:span text:style-name="T2">(31/24) </text:span> ⲟⲩⲧⲩⲡⲟⲥ ⲛ̅ⲧⲉ ⲛⲓⲁⲣⲭⲱ̣[ⲛ] <text:line-break/><text:span text:style-name="T1"> </text:span><text:span text:style-name="T2">(31/25) </text:span> ⲁⲩⲱ ⲛⲉϥⲙ̅ⲡϣⲁ ⲛ̅ϥ[ⲃⲱⲗ] <text:line-break/><text:span text:style-name="T1"> </text:span><text:span text:style-name="T2">(31/26) </text:span> ⲉⲃⲟⲗ· ⲉⲃⲟⲗ {ϩ̅ⲓ}ⲧⲟⲟⲧⲟⲩ̣ [ <text:line-break/><text:span text:style-name="T1"> </text:span><text:span text:style-name="T2">(31/27) </text:span> ⲇⲉ ⲛⲓⲁⲣⲭ[ⲱ]ⲛ̣ [ <text:line-break/><text:span text:style-name="T1"> </text:span><text:span text:style-name="T2">(31/28) </text:span> ⲉⲧⲁϥϫ[ <text:line-break/><text:span text:style-name="T1"> </text:span><text:span text:style-name="T2">(31/29) </text:span> ϫⲉ ⲉⲥⲣ̅.[ <text:line-break/><text:span text:style-name="T1"> </text:span><text:span text:style-name="T2">(31/30) </text:span> ϭⲱⲛⲧ̅’ ⲉ.[ <text:line-break/><text:span text:style-name="T1"> </text:span><text:span text:style-name="T2">(31/31) </text:span> ⲛ̅ⲇⲓⲕ[ⲁⲓⲟⲥ <text:line-break/><text:span text:style-name="T1"> </text:span><text:span text:style-name="T2">(32/1) </text:span> [ⲟⲩ]ϩⲙ̅ϩⲁⲗ ⲛⲁϥ ⲡⲉ· ⲉⲧⲃⲉ ⲡⲁⲓ̈ ⲟⲩⲛ‐ <text:line-break/><text:span text:style-name="T1"> </text:span><text:span text:style-name="T2">(32/2) </text:span> ⲧ̣ⲁⲕ ⲙ̅ⲡⲉⲓ̈ⲣⲁⲛ ϫⲉ ⲓ̈ⲁⲕⲱⲃⲟⲥ <text:line-break/><text:span text:style-name="T1"> </text:span><text:span text:style-name="T2">(32/3) </text:span> ⲡⲓⲇⲓⲕⲁⲓⲟⲥ· ⲕⲛⲁⲩ ϫⲉ ⲛ̅ⲁϣ <text:line-break/><text:span text:style-name="T1"> </text:span><text:span text:style-name="T2">(32/4) </text:span> ⲛ̅ϩⲉ ⲕⲛⲁⲣ̅ⲛⲏⲫⲉ ⲉⲧⲁⲕⲛⲁⲩ <text:line-break/><text:soft-page-break/><text:span text:style-name="T1"> </text:span><text:span text:style-name="T2">(32/5) </text:span> ⲉⲣⲟⲉⲓ· ⲁⲩⲱ ⲁⲕⲕⲱ ⲛ̅ⲧⲉⲓ̈ⲡⲣⲟⲥ‐ <text:line-break/><text:span text:style-name="T1"> </text:span><text:span text:style-name="T2">(32/6) </text:span> ⲉⲩⲭⲏ· ⲉⲡⲓ ⲇⲉ ⲛ̅ⲧⲉⲕ ⲟⲩⲇⲓⲕⲁⲓ‐ <text:line-break/><text:span text:style-name="T1"> </text:span><text:span text:style-name="T2">(32/7) </text:span> ⲟⲥ ⲛ̅ⲧⲉ ⲡⲛⲟⲩⲧⲉ· ⲁⲩⲱ ϭⲉ ⲁⲕ‐ <text:line-break/><text:span text:style-name="T1"> </text:span><text:span text:style-name="T2">(32/8) </text:span> ⲙⲟⲗϩⲕ̅ ⲛ̅ϩⲏⲧ’ ⲁⲕϯ ⲡⲓ ⲉⲣⲱⲉⲓ· <text:line-break/><text:span text:style-name="T1"> </text:span><text:span text:style-name="T2">(32/9) </text:span> ϩⲁⲙⲏⲛ ϯϫⲱ ⲙ̅ⲙⲟⲥ ⲛⲁⲕ ϫⲉ <text:line-break/><text:span text:style-name="T1"> </text:span><text:span text:style-name="T2">(32/10) </text:span> ⲁⲕⲕⲓⲙ ⲉⲩⲛⲟϭ ⲛ̅ϭⲱⲛⲧ̅’ ⲙⲛ̅ⲛ ⲟⲩ‐ <text:line-break/><text:span text:style-name="T1"> </text:span><text:span text:style-name="T2">(32/11) </text:span> ⲃⲱⲗⲕ̅ ⲉϩⲣⲁⲓ̈ ⲉϫⲱⲕ· ⲁⲗⲗⲁ <text:line-break/><text:span text:style-name="T1"> </text:span><text:span text:style-name="T2">(32/12) </text:span> ϩⲱⲥⲧⲉ ⲛ̅ⲧⲉⲛⲉⲓ̈ⲕⲟⲟⲩⲉ ϣⲱⲡⲉ <text:line-break/><text:span text:style-name="T1"> </text:span><text:span text:style-name="T2">(32/13) </text:span> ⲓ̈ⲁⲕⲱⲃⲟⲥ ϫⲉ ⲛⲉⲩϭⲁⲃϩⲏⲧ’ ⲡⲉ <text:line-break/><text:span text:style-name="T1"> </text:span><text:span text:style-name="T2">(32/14) </text:span> ⲉϥⲣⲓⲙⲉ· ⲁⲩⲱ ⲁϥⲙ̅ⲕⲁϩ ⲛ̅ϩⲏⲧ’ <text:line-break/><text:span text:style-name="T1"> </text:span><text:span text:style-name="T2">(32/15) </text:span> ⲉⲙⲁⲧⲉ· ⲁⲩⲱ ⲁⲩϩⲙⲟⲟⲥ ⲙ̅‐ <text:line-break/><text:span text:style-name="T1"> </text:span><text:span text:style-name="T2">(32/16) </text:span> ⲡⲉⲥⲛⲁⲩ {ϩ̅ⲓ}ϫⲛ̅ ⲟⲩⲡⲉⲧⲣⲁ· ⲡⲉϫⲉ <text:line-break/><text:span text:style-name="T1"> </text:span><text:span text:style-name="T2">(32/17) </text:span> ⲡϫⲟⲉⲓⲥ ⲛⲁϥ ϫⲉ ⲓ̈ⲁⲕⲱⲃⲟⲥ ϩⲱⲥⲧⲉ <text:line-break/><text:span text:style-name="T1"> </text:span><text:span text:style-name="T2">(32/18) </text:span> ⲕⲛⲁϫⲓ ⲛ̅ⲛⲉⲓ̈ⲙ̅ⲕⲟⲟϩ· ⲁⲗⲗⲁ ⲙ̅ⲡⲣ̅‐ <text:line-break/><text:span text:style-name="T1"> </text:span><text:span text:style-name="T2">(32/19) </text:span> ϥⲓ ϣⲛ̅ϩⲏⲧ’ ϯⲥⲁⲣⲁⲝ ⲅⲁⲣ ⲟⲩϭⲁⲃ‐ <text:line-break/><text:span text:style-name="T1"> </text:span><text:span text:style-name="T2">(32/20) </text:span> ϩⲏⲧ’ ⲧⲉ· ⲥⲛⲁϫⲓ ⲡⲉⲛⲧⲁⲩⲧⲁ‐ <text:line-break/><text:span text:style-name="T1"> </text:span><text:span text:style-name="T2">(32/21) </text:span> ϣϥ̅ ⲛⲁⲥ· ⲛ̅ⲧⲟⲕ ⲇⲉ ⲙ̅ⲡⲣ̅ⲣ̅ <text:line-break/><text:span text:style-name="T1"> </text:span><text:span text:style-name="T2">(32/22) </text:span> [ϭⲁⲃ]ϩⲏⲧ· ⲟⲩⲧⲉ ⲙ̅ⲡⲣ̅ⲣ̅ ϩⲟⲧⲉ <text:line-break/><text:span text:style-name="T1"> </text:span><text:span text:style-name="T2">(32/23) </text:span> [ⲁϥⲗ]ⲟ̣ ⲛ̅ϭⲓ ⲡϫⲟⲉⲓⲥ· ⲓ̈ⲁⲕⲱⲃⲟⲥ <text:line-break/><text:span text:style-name="T1"> </text:span><text:span text:style-name="T2">(32/24) </text:span> [ⲇⲉ ⲛ̅]ⲧⲁⲣⲉϥⲥⲱⲧⲙ̅ ⲉⲛⲁⲓ̈· ⲁϥϥⲱ‐ <text:line-break/><text:span text:style-name="T1"> </text:span><text:span text:style-name="T2">(32/25) </text:span> [ⲧⲉ ⲛ̅ⲛⲉ]ϥⲣⲙ̅ⲉⲓⲟⲟⲩⲉ ⲉⲧ’{ϩ̅ⲓ} <text:line-break/><text:span text:style-name="T1"> </text:span><text:span text:style-name="T2">(32/26) </text:span> [ⲛⲉϥⲃⲁⲗ ⲁ]ⲩ̣ⲱ̣ ϣⲉⲥⲓ ⲉⲙⲁⲧⲉ <text:line-break/><text:span text:style-name="T1"> </text:span><text:span text:style-name="T2">(32/27) </text:span> [ 10+- ]ⲏ̣ⲧ’ ⲉⲧ’ϣⲟ‐ <text:line-break/><text:span text:style-name="T1"> </text:span><text:span text:style-name="T2">(32/28) </text:span> [ⲟⲡ....ⲡⲉϫⲉ] ⲡϫⲟⲉⲓⲥ ⲛⲁ[ϥ] <text:line-break/><text:span text:style-name="T1"> </text:span><text:span text:style-name="T2">(32/29) </text:span> [ϫⲉ ⲓ̈ⲁⲕⲱⲃⲟⲥ ⲉⲓⲥ] ϩⲏⲧⲉ ϯⲛⲁ‐ <text:line-break/><text:span text:style-name="T1"> </text:span><text:span text:style-name="T2">(33/1) </text:span> ϭⲱⲗⲡ̅’ ⲛⲁⲕ ⲉⲃⲟⲗ ⲙ̅ⲡⲉⲕⲥⲱⲧⲉ̣ <text:line-break/><text:span text:style-name="T1"> </text:span><text:span text:style-name="T2">(33/2) </text:span> ⲉϣⲱⲡⲉ ⲉⲩϣⲁⲛⲁⲙⲁϩⲧⲉ ⲙ̅ⲙ[ⲟⲕ] <text:line-break/><text:span text:style-name="T1"> </text:span><text:span text:style-name="T2">(33/3) </text:span> ⲁⲩⲱ [ⲛ̅]ⲅ’ϫⲓ ⲛ̅ⲛⲉⲓ̈ⲙ̅ⲕⲟⲟϩ· ⲟⲩⲛ̅ <text:line-break/><text:span text:style-name="T1"> </text:span><text:span text:style-name="T2">(33/4) </text:span> ⲟⲩⲙ̣ⲏⲏ̣ϣⲉ ⲛⲁϩⲁⲕⲟⲩ ⲟⲩⲃⲏⲕ <text:line-break/><text:span text:style-name="T1"> </text:span><text:span text:style-name="T2">(33/5) </text:span> ϫⲉ ⲉ〈ⲩ〉ⲛⲁ〈ⲁ〉ⲙⲁϩⲧⲉ ⲙ̅ⲙⲟⲕ· ⲛ̅ϩⲟⲩⲟ <text:line-break/><text:span text:style-name="T1"> </text:span><text:span text:style-name="T2">(33/6) </text:span> ⲇⲉ ϣⲟⲙⲧ̅’ ⲉⲃⲟⲗ ⲛ̅ϩⲏⲧⲟⲩ ⲥⲉ‐ <text:line-break/><text:span text:style-name="T1"> </text:span><text:span text:style-name="T2">(33/7) </text:span> ⲛⲁⲁⲙⲁϩⲧⲉ ⲙ̅ⲙⲟⲕ· ⲛⲁⲓ̈ ⲉⲧ’‐ <text:line-break/><text:span text:style-name="T1"> </text:span><text:span text:style-name="T2">(33/8) </text:span> ϩⲙⲟⲟⲥ ⲉⲛⲧⲉⲗⲱⲛⲏⲥ ⲛⲉ· ⲟⲩ <text:line-break/><text:span text:style-name="T1"> </text:span><text:span text:style-name="T2">(33/9) </text:span> ⲙⲟⲛⲟⲛ ⲉⲩϣⲉⲧ’ ⲧⲉⲗⲟⲥ· ⲁⲗⲗⲁ <text:line-break/><text:span text:style-name="T1"> </text:span><text:span text:style-name="T2">(33/10) </text:span> ⲛⲓⲕⲉⲯⲩⲭⲟⲟⲩⲉ ⲉⲩϥⲓ ⲙ̅ⲙⲟ‐ <text:line-break/><text:span text:style-name="T1"> </text:span><text:span text:style-name="T2">(33/11) </text:span> ⲟⲩ ⲥⲧⲉⲣ*4ⲉⲥⲓⲙⲟⲥ· ⲉϣⲱⲡⲉ <text:line-break/><text:span text:style-name="T1"> </text:span><text:span text:style-name="T2">(33/12) </text:span> ϭⲉ ⲉⲕϣⲁⲛ{ⲉ̅ⲓ} ⲉⲧⲟⲟⲧⲟⲩ· ⲟⲩⲛ̅ <text:line-break/><text:span text:style-name="T1"> </text:span><text:span text:style-name="T2">(33/13) </text:span> ⲟⲩⲁ ⲉⲃⲟⲗ ⲛ̅ϩⲏⲧⲟⲩ ⲛⲁϫⲟⲟⲥ <text:line-break/><text:span text:style-name="T1"> </text:span><text:span text:style-name="T2">(33/14) </text:span> ⲛⲁⲕ· ⲉⲩⲣⲉϥⲁⲣⲉϩ ⲛ̅ⲧⲁⲩ ⲡⲉ <text:line-break/><text:span text:style-name="T1"> </text:span><text:span text:style-name="T2">(33/15) </text:span> ϫⲉ ⲛ̅ⲧⲕ̅ ⲛⲓⲙ ⲏ%0 ⲛ̅ⲧⲕ̅ ⲟⲩⲉⲃⲟⲗ <text:line-break/><text:span text:style-name="T1"> </text:span><text:span text:style-name="T2">(33/16) </text:span> ⲧⲱⲛ· ⲉⲕⲉϫⲟⲟⲥ ⲛⲁϥ ϫⲉ ⲁⲛⲁⲕ <text:line-break/><text:span text:style-name="T1"> </text:span><text:span text:style-name="T2">(33/17) </text:span> ⲟⲩϣⲏⲣⲉ ⲁⲩⲱ ⲁⲛⲟⲕ ⲟⲩⲉⲃⲟⲗ <text:line-break/><text:span text:style-name="T1"> </text:span><text:span text:style-name="T2">(33/18) </text:span> ϩⲙ̅ ⲡⲓⲱⲧ’· ϥⲛⲁϫⲟⲟⲥ ⲛⲁⲕ ϫⲉ <text:line-break/><text:span text:style-name="T1"> </text:span><text:span text:style-name="T2">(33/19) </text:span> ⲛ̅ⲧⲕ̅ {ⲡⲁ}ⲁϣ ⲛ̅ϣⲏⲣⲉ· ⲁⲩⲱ <text:line-break/><text:span text:style-name="T1"> </text:span><text:span text:style-name="T2">(33/20) </text:span> ⲛ̅ⲧⲕ̅ ⲡⲁⲛⲓⲙ ⲛ̅ⲉⲓⲱⲧ’· ⲉⲕⲉ‐ <text:line-break/><text:span text:style-name="T1"> </text:span><text:span text:style-name="T2">(33/21) </text:span> ϫⲟⲟⲥ ⲛⲁϥ ϫⲉ ⲁⲛⲟⲕ ⲟⲩⲉⲃⲟ̣ⲗ̣ <text:line-break/><text:span text:style-name="T1"> </text:span><text:span text:style-name="T2">(33/22) </text:span> ϩⲙ̅ ⲡⲓⲱⲧ’ ⲉⲧⲣ̅ ϣⲟⲣⲡ̅’ [ⲛ̅ϣⲟⲟⲡ·] <text:line-break/><text:soft-page-break/><text:span text:style-name="T1"> </text:span><text:span text:style-name="T2">(33/23) </text:span> ⲟⲩϣⲏⲣⲉ ⲇⲉ ⲉϥϩⲙ̅ ⲡⲉⲧ[ⲣ̅] <text:line-break/><text:span text:style-name="T1"> </text:span><text:span text:style-name="T2">(33/24) </text:span> ϣⲟⲣⲡ̅ ⲛ̅ϣⲟⲟⲡ[·] ⲉ̣ϥ̣[ⲛⲁϫⲟⲟⲥ] <text:line-break/><text:span text:style-name="T1"> </text:span><text:span text:style-name="T2">(33/25) </text:span> ⲛⲁⲕ ϫⲉ ⲁⲩ[ <text:line-break/><text:span text:style-name="T1"> </text:span><text:span text:style-name="T2">(33/26) </text:span> ⲉⲕⲉ ϫ[ⲟⲟⲥ ⲛⲁϥ ϫⲉ <text:line-break/><text:span text:style-name="T1"> </text:span><text:span text:style-name="T2">(33/27) </text:span> ϩⲙ̅ ⲡⲏ[ <text:line-break/><text:span text:style-name="T1"> </text:span><text:span text:style-name="T2">(33/28) </text:span> ϫⲉ ⲉⲓ̈ⲉ[ <text:line-break/><text:span text:style-name="T1"> </text:span><text:span text:style-name="T2">(33/29) </text:span> [..]ⲉⲧ̣[ <text:line-break/><text:span text:style-name="T1"> </text:span><text:span text:style-name="T2">(33/30) </text:span> [ <text:line-break/><text:span text:style-name="T1"> </text:span><text:span text:style-name="T2">(34/1) </text:span> [ⲛ̅]ⲛⲓϣⲙ̅ⲙⲟ· ⲉⲕⲉϫ̣ⲟⲟⲥ ⲛⲁϥ <text:line-break/><text:span text:style-name="T1"> </text:span><text:span text:style-name="T2">(34/2) </text:span> ϫ̣ⲉ ϩⲉⲛϣⲙ̅ⲙⲟ ⲁⲛ ⲉⲡⲧⲏⲣϥ̅ ⲛⲉ <text:line-break/><text:span text:style-name="T1"> </text:span><text:span text:style-name="T2">(34/3) </text:span> [ⲁⲗⲗⲁ] ϩⲉⲛⲉⲃⲟⲗ ϩⲛ̅ⲛ {2̅ⲁ̅[̅ⲭ̅ⲁ̅]̅ⲙ̅ⲱ̅ⲑ}2 <text:line-break/><text:span text:style-name="T1"> </text:span><text:span text:style-name="T2">(34/4) </text:span> ⲛⲉ· ⲉⲧⲉ ⲧⲉⲥ{ϩ̅ⲓ}ⲙⲉ· ⲁⲩⲱ̣ ⲛ̣ⲁⲓ̈ <text:line-break/><text:span text:style-name="T1"> </text:span><text:span text:style-name="T2">(34/5) </text:span> ⲁⲥⲧⲁⲙⲓⲟⲟⲩ ⲉⲥⲉⲓⲛⲉ ⲙ̅ⲡⲓⲅⲉ‐ <text:line-break/><text:span text:style-name="T1"> </text:span><text:span text:style-name="T2">(34/6) </text:span> ⲛⲟⲥ ⲉⲡⲉⲥⲏⲧ’· ⲉⲃⲟⲗ ϩⲙ̅ ⲡⲏ ⲉⲧⲣ̅ <text:line-break/><text:span text:style-name="T1"> </text:span><text:span text:style-name="T2">(34/7) </text:span> ϣⲟⲣⲡ̅’ ⲛ̅ϣⲟⲟⲡ’· ⲁⲣⲁ ϩⲉⲛϣⲙ̅‐ <text:line-break/><text:span text:style-name="T1"> </text:span><text:span text:style-name="T2">(34/8) </text:span> ⲙⲟ ⲁⲛ ⲛⲉ· ⲁⲗⲗⲁ ⲛⲉⲧⲉ ⲛⲟⲩⲛ ⲛⲉ· <text:line-break/><text:span text:style-name="T1"> </text:span><text:span text:style-name="T2">(34/9) </text:span> ⲛⲉⲧⲉ ⲛⲟⲩⲛ ⲙⲉⲛ ⲛⲉ· ϫⲉ ⲧⲉ‐ <text:line-break/><text:span text:style-name="T1"> </text:span><text:span text:style-name="T2">(34/10) </text:span> ⲧⲟ ⲛ̅ϫⲟⲉⲓⲥ ⲉⲣⲟⲟⲩ· ⲟⲩⲉⲃⲟⲗ <text:line-break/><text:span text:style-name="T1"> </text:span><text:span text:style-name="T2">(34/11) </text:span> ⲧⲉ ϩⲙ̅ ⲡⲉⲧⲣ̅ ϣⲟⲣⲡ̅’ ⲛ̅ϣⲟⲟⲡ· <text:line-break/><text:span text:style-name="T1"> </text:span><text:span text:style-name="T2">(34/12) </text:span> ϩⲉⲛϣⲙ̅ⲙⲟ ⲇⲉ ⲛⲉ ⲕⲁⲧⲁ ⲡⲉⲓ̈ <text:line-break/><text:span text:style-name="T1"> </text:span><text:span text:style-name="T2">(34/13) </text:span> ϫⲉ ⲡⲉⲧⲣ̅ ϣⲟⲣⲡ̅’ ⲛ̅ϣⲟⲟⲡ’ ⲙ̅ⲡⲉϥ‐ <text:line-break/><text:span text:style-name="T1"> </text:span><text:span text:style-name="T2">(34/14) </text:span> ⲣ̅ⲕⲟⲓⲛⲱⲛⲓ ⲉⲣⲟⲥ[·] ⲧⲟⲧⲉ ⲉⲥⲛⲁ‐ <text:line-break/><text:span text:style-name="T1"> </text:span><text:span text:style-name="T2">(34/15) </text:span> ⲧⲁⲙⲓⲟⲟⲩ· ⲉϥⲛⲁϫⲟⲟⲥ ⲛⲁⲕ ⲟⲛ <text:line-break/><text:span text:style-name="T1"> </text:span><text:span text:style-name="T2">(34/16) </text:span> ϫⲉ ⲉⲕⲛⲁⲃⲱⲕ ⲉⲧⲱⲛ· ⲉⲕⲉϫⲟ‐ <text:line-break/><text:span text:style-name="T1"> </text:span><text:span text:style-name="T2">(34/17) </text:span> ⲟⲥ ⲛⲁϥ ϫⲉ ⲉⲡⲙⲁ ⲉⲧⲁⲓ̈{ⲉ̅ⲓ} ⲉⲃⲟⲗ <text:line-break/><text:span text:style-name="T1"> </text:span><text:span text:style-name="T2">(34/18) </text:span> ⲙ̅ⲙⲁⲩ ⲉⲓ̈ⲛⲁⲃⲱⲕ ⲟⲛ ⲉⲙⲁⲩ· <text:line-break/><text:span text:style-name="T1"> </text:span><text:span text:style-name="T2">(34/19) </text:span> ⲛⲁⲓ̈ ⲇⲉ ⲉⲕϣⲁⲛϫⲟⲟⲩ ⲕⲛⲁⲣ̅ <text:line-break/><text:span text:style-name="T1"> </text:span><text:span text:style-name="T2">(34/20) </text:span> ⲃⲟⲗ ⲉⲛⲉⲩⲡⲟⲗⲉⲙⲟⲥ· ⲉϣⲱ‐ <text:line-break/><text:span text:style-name="T1"> </text:span><text:span text:style-name="T2">(34/21) </text:span> ⲡ̣ⲉ̣ ⲇⲉ ⲉⲕϣⲁⲛⲉⲓ ⲉⲧⲟⲟⲧⲟⲩ <text:line-break/><text:span text:style-name="T1"> </text:span><text:span text:style-name="T2">(34/22) </text:span> [ⲛ̅ⲛⲓ]ϣⲟⲙⲉⲧ’ ⲛ̅ⲣⲉϥⲁⲙⲁϩⲧⲉ <text:line-break/><text:span text:style-name="T1"> </text:span><text:span text:style-name="T2">(34/23) </text:span> [ⲛⲏ ⲉ]ⲧ’̣ϥⲓ ⲛ̅ⲛⲙ̅ⲯⲩⲭⲏ ⲥⲧ*4ⲉⲣⲉ‐ <text:line-break/><text:span text:style-name="T1"> </text:span><text:span text:style-name="T2">(34/24) </text:span> [ⲥⲓⲙⲟⲥ ϩ]ⲙ̅ ⲡⲙⲁ ⲉⲧⲙ̅ⲙⲁⲩ <text:line-break/><text:span text:style-name="T1"> </text:span><text:span text:style-name="T2">(34/25) </text:span> [ 11+- ]ⲛ̣ⲓ ⲛⲁⲓ̈ ⲉⲕⲉ̣ <text:line-break/><text:span text:style-name="T1"> </text:span><text:span text:style-name="T2">(34/26) </text:span> [ 11+- ]ⲕ̣ ⲟⲩⲥⲕⲉ[ⲩ]‐ <text:line-break/><text:span text:style-name="T1"> </text:span><text:span text:style-name="T2">(34/27) </text:span> [ⲟⲥ 10+- ]ϩⲟⲩⲟ ⲛ̅[ <text:line-break/><text:span text:style-name="T1"> </text:span><text:span text:style-name="T2">(34/28) </text:span> [ 11+- ].̅ⲟ̣̅̅ ⲡ̣[ <text:line-break/><text:span text:style-name="T1"> </text:span><text:span text:style-name="T2">(35/1) </text:span> [ 6+-]..[ 7+- ]ⲧⲉ ⲛ̅ⲧⲉ̣ <text:line-break/><text:span text:style-name="T1"> </text:span><text:span text:style-name="T2">(35/2) </text:span> ⲧ̣ⲉⲧⲉⲧⲛ̅.ⲉ.[...]ⲥⲉ ⲅⲁⲣ [ <text:line-break/><text:span text:style-name="T1"> </text:span><text:span text:style-name="T2">(35/3) </text:span> ⲛⲁⲧ̣ⲛ̅ [...]ⲉ̣ ⲧⲉⲥⲛⲟⲩⲛⲉ· ⲛ̅ⲧⲱ‐ <text:line-break/><text:span text:style-name="T1"> </text:span><text:span text:style-name="T2">(35/4) </text:span> ⲧ[ⲛ̅ ϩⲱⲧ]ⲧ̣ⲏⲩⲧⲛ̅ ⲧⲉⲧⲛⲁⲣ̅ⲛⲏ‐ <text:line-break/><text:span text:style-name="T1"> </text:span><text:span text:style-name="T2">(35/5) </text:span> ⲫⲓ ⲁⲛ[...] ⲁⲛⲟⲕ ⲇⲉ ϯⲛⲁⲱϣ <text:line-break/><text:span text:style-name="T1"> </text:span><text:span text:style-name="T2">(35/6) </text:span> ⲉϩⲣⲁⲓ̈ [ⲉϫⲛ̅] ϯⲅⲛⲱⲥⲓⲥ ⲛ̅ⲛⲁⲧ’‐ <text:line-break/><text:span text:style-name="T1"> </text:span><text:span text:style-name="T2">(35/7) </text:span> ⲧⲁⲕⲟ ⲉⲧⲉ [ⲧ]ⲥⲟⲫⲓⲁ ⲧⲉ ⲧⲏ ⲉⲧ’‐ <text:line-break/><text:span text:style-name="T1"> </text:span><text:span text:style-name="T2">(35/8) </text:span> ϣⲟⲟⲡ’ ϩⲙ̅ ⲡⲓⲱⲧ’· ⲉⲧⲉ ⲧⲙⲁⲁⲩ <text:line-break/><text:span text:style-name="T1"> </text:span><text:span text:style-name="T2">(35/9) </text:span> ⲧⲉ ⲛ̅ⲧⲉ ⲁ̅ⲭ̅ⲁ̅ⲙ̅ⲱ̅ⲑ̅· ⲙ̅ⲡⲉ ⲉⲓⲱⲧ’ <text:line-break/><text:span text:style-name="T1"> </text:span><text:span text:style-name="T2">(35/10) </text:span> ϣⲱⲡⲉ ⲛ̅ⲛⲁ̅ⲭ̅ⲁ̅ⲙ̅ⲱ̅ⲑ̅· ⲟⲩⲧⲉ <text:line-break/><text:span text:style-name="T1"> </text:span><text:span text:style-name="T2">(35/11) </text:span> [ⲟⲩⲥⲩ]ⲝ̣ⲩⲅ̣ⲟⲥ ⲛ̅ϩⲟⲟⲩⲧ’· ⲁⲗⲗⲁ <text:line-break/><text:soft-page-break/><text:span text:style-name="T1"> </text:span><text:span text:style-name="T2">(35/12) </text:span> [ⲟ]ⲩ[ⲥ{ϩ̅ⲓ}]ⲙⲉ ⲧⲉ ⲉⲃⲟⲗ ϩⲛ̅ⲛ ⲟⲩ‐ <text:line-break/><text:span text:style-name="T1"> </text:span><text:span text:style-name="T2">(35/13) </text:span> ⲥ{ϩ̅ⲓ}ⲙ[ⲉ ⲁ]ⲥⲧⲁⲙⲓⲉ ⲧⲏⲩⲧⲛ̅ ⲉ‐ <text:line-break/><text:span text:style-name="T1"> </text:span><text:span text:style-name="T2">(35/14) </text:span> ϫⲛ̅ ϩ̣[ⲟⲟ]ⲩⲧ’ ⲉⲥϣⲟⲟⲡ’ ⲟⲩⲁ‐ <text:line-break/><text:span text:style-name="T1"> </text:span><text:span text:style-name="T2">(35/15) </text:span> ⲁⲥ· ⲉⲥⲉ ⲛ̅ⲛⲁⲧⲙ̅ⲙⲉ ⲉⲛⲉⲧ’‐ <text:line-break/><text:span text:style-name="T1"> </text:span><text:span text:style-name="T2">(35/16) </text:span> [ⲟ]ⲛ̣ϩ̅ [ϩⲛ̅] ⲧⲉⲥⲙⲁⲁⲩ· ⲉⲥⲙⲉⲉⲩⲉ <text:line-break/><text:span text:style-name="T1"> </text:span><text:span text:style-name="T2">(35/17) </text:span> ϫ̣ⲉ ⲛ̅ⲧⲟⲥ ⲟⲩⲁⲁⲥ ⲡⲉⲧ’ϣⲟⲟⲡ’ <text:line-break/><text:span text:style-name="T1"> </text:span><text:span text:style-name="T2">(35/18) </text:span> [ⲁⲛⲟ]ⲕ ⲇⲉ ϯⲛⲁϫⲓ ϣⲕⲁⲕ ⲉϩⲣⲁⲓ̈ <text:line-break/><text:span text:style-name="T1"> </text:span><text:span text:style-name="T2">(35/19) </text:span> ⲟⲩⲃⲉ ⲧⲉⲥⲙⲁⲁⲩ· ⲁⲩⲱ ⲧⲟ‐ <text:line-break/><text:span text:style-name="T1"> </text:span><text:span text:style-name="T2">(35/20) </text:span> ⲧⲉ ⲉⲩⲉϣⲧⲟⲣⲧⲣ̅ ⲉⲩⲉϭⲛ̅ <text:line-break/><text:span text:style-name="T1"> </text:span><text:span text:style-name="T2">(35/21) </text:span> {ϭⲛ̅} ⲟⲩϩⲱⲃ ⲉϩⲟⲩⲛ ⲉⲧⲉⲩ‐ <text:line-break/><text:span text:style-name="T1"> </text:span><text:span text:style-name="T2">(35/22) </text:span> ⲛⲟⲩⲛⲉ ⲙⲛ̅ ⲡⲅⲉⲛⲟ[ⲥ ⲛ̅]‐ <text:line-break/><text:span text:style-name="T1"> </text:span><text:span text:style-name="T2">(35/23) </text:span> ⲧⲉⲩⲙⲁⲁⲩ· ⲛ̅ⲧⲟⲕ [ⲇⲉ] <text:line-break/><text:span text:style-name="T1"> </text:span><text:span text:style-name="T2">(35/24) </text:span> ⲉⲕⲉⲃⲱⲕ ⲉϩⲣⲁⲓ̈ ⲉ̣[ⲛⲉⲧⲉ] <text:line-break/><text:span text:style-name="T1"> </text:span><text:span text:style-name="T2">(35/25) </text:span> ⲛⲱⲕ ⲛⲉⲥ̣[ <text:line-break/><text:span text:style-name="T1"> </text:span><text:span text:style-name="T2">(35/26) </text:span> ⲛⲉ ⲧ̣[ⲉⲧ]ⲛ̣ⲁⲩ[ <text:line-break/><text:span text:style-name="T1"> </text:span><text:span text:style-name="T2">(35/27) </text:span> [...].ⲧ[ <text:line-break/><text:span text:style-name="T1"> </text:span><text:span text:style-name="T2">(35/28) </text:span> (2+- lines lacking) <text:line-break/><text:span text:style-name="T1"> </text:span><text:span text:style-name="T2">(36/1) </text:span> ⲡ̣ⲉⲧⲣ̅ ϣ[ⲟⲣⲡ̅ ⲛ̅ϣⲟⲟ]ⲡ’̣· [ⲥ]ⲉ̣[ⲟ] <text:line-break/><text:span text:style-name="T1"> </text:span><text:span text:style-name="T2">(36/2) </text:span> [ⲛ̅ⲧ]ⲩⲡⲟⲥ [ⲙ̅ⲡⲓ]ⲙⲛ̅[ⲧⲥ]ⲛ̣ⲟⲟⲩ[ⲥ] <text:line-break/><text:span text:style-name="T1"> </text:span><text:span text:style-name="T2">(36/3) </text:span> ⲙ̅ⲙⲁⲑⲏⲧⲏⲥ· ⲙⲛ̅ [ⲡⲓⲙⲛ̅ⲧ]‐ <text:line-break/><text:span text:style-name="T1"> </text:span><text:span text:style-name="T2">(36/4) </text:span> ⲥⲛⲟⲟⲩⲥ ⲛ̅ⲥⲟⲉⲓϣ ⲛ̣[....]..ⲉ <text:line-break/><text:span text:style-name="T1"> </text:span><text:span text:style-name="T2">(36/5) </text:span> ⲁ̅ⲕ̅ⲭ̅ⲁ̅ⲙ̣̅̅ⲱ̅ⲑ̅̓ ⲧ̅’ⲉ̣[ⲧⲟⲩ]ⲣ̣̅ϩⲉⲣ‐ <text:line-break/><text:span text:style-name="T1"> </text:span><text:span text:style-name="T2">(36/6) </text:span> ⲙⲏ̣ⲛⲉⲩⲉ ⲙ̅ⲙ[ⲟⲥ] ϫⲉ̣ ⲥ̣ⲟⲫⲓⲁ· <text:line-break/><text:span text:style-name="T1"> </text:span><text:span text:style-name="T2">(36/7) </text:span> ⲁⲩⲱ ⲁⲛⲟⲕ ⲇⲉ ⲁⲛ̣ⲟⲕ ⲛⲓⲙ̓ <text:line-break/><text:span text:style-name="T1"> </text:span><text:span text:style-name="T2">(36/8) </text:span> ⲙⲛ̅ ⲧⲥⲟⲫⲓⲁ ⲛ̅ⲛⲁⲧⲧⲁⲕⲟ ⲧⲉⲧ’‐ <text:line-break/><text:span text:style-name="T1"> </text:span><text:span text:style-name="T2">(36/9) </text:span> ⲕⲛⲁⲥⲱⲧⲉ ⲉⲃⲟⲗ {ϩ̅ⲓ}ⲧⲟⲟⲧⲥ̅· <text:line-break/><text:span text:style-name="T1"> </text:span><text:span text:style-name="T2">(36/10) </text:span> ⲙⲛ̅ ⲛ̅ϣⲏⲣⲉ ⲧⲏⲣⲟⲩ ⲛ̅ⲧⲉ̣ ⲡ̣ⲉⲧ’‐ <text:line-break/><text:span text:style-name="T1"> </text:span><text:span text:style-name="T2">(36/11) </text:span> ϣⲟⲟⲡ’· ⲛⲁⲓ̈ ⲛ̅ⲧⲁⲩⲥⲟ[ⲩⲱ]‐ <text:line-break/><text:span text:style-name="T1"> </text:span><text:span text:style-name="T2">(36/12) </text:span> ⲛⲟⲩ· ⲁⲩⲱ ⲁⲩϩⲱⲡ’ ϩ[ⲣⲁⲓ̈] ⲛ̣̅‐ <text:line-break/><text:span text:style-name="T1"> </text:span><text:span text:style-name="T2">(36/13) </text:span> ϩⲏⲧⲟⲩ· ⲉⲕⲉϩⲱⲡ 〈ⲙ̅ⲙⲟⲟⲩ〉 ϩⲣ[ⲁⲓ̈ ⲛ̅]ϩ̣ⲏⲧⲕ̅· <text:line-break/><text:span text:style-name="T1"> </text:span><text:span text:style-name="T2">(36/14) </text:span> ⲉⲕⲉϣⲱⲡⲉ ⲇⲉ ⲉⲕⲕⲱ̣ ⲛ̅ⲣⲱⲕ· <text:line-break/><text:span text:style-name="T1"> </text:span><text:span text:style-name="T2">(36/15) </text:span> ⲉⲕⲉϭⲟⲗⲡⲟⲩ ⲇⲉ ⲉⲃⲟⲗ ⲛ̅ⲁⲇ‐ <text:line-break/><text:span text:style-name="T1"> </text:span><text:span text:style-name="T2">(36/16) </text:span> ⲇⲁⲓⲟⲥ· ⲉϣⲱⲡⲉ ⲉⲕ[ⲛ]ⲁ{ⲉ̣̅̅[̅ⲓ} ⲉ]ⲃⲟⲗ <text:line-break/><text:span text:style-name="T1"> </text:span><text:span text:style-name="T2">(36/17) </text:span> ⲁⲩⲱ ⲛ̅ⲧⲉⲩⲛⲟⲩ ⲉⲩⲛⲁ[ⲣ̅]ⲡ̣[ⲟ]‐ <text:line-break/><text:span text:style-name="T1"> </text:span><text:span text:style-name="T2">(36/18) </text:span> ⲗⲉⲙⲓ ⲙⲛ̅ ⲡⲉⲓ̈ⲕⲁϩ· ⲙⲁ̣[ϯ ⲣⲙⲉⲓⲏ] <text:line-break/><text:span text:style-name="T1"> </text:span><text:span text:style-name="T2">(36/19) </text:span> ⲟⲩⲛ ⲙ̅ⲡⲉⲧ’ϣⲟⲟⲡ’ ϩⲛ̅ⲛ ⲓ̅ⲗ̅ⲏ̅ⲙ̅ <text:line-break/><text:span text:style-name="T1"> </text:span><text:span text:style-name="T2">(36/20) </text:span> ⲁ̅ⲇ̅ⲇ̅ⲉ̅ⲟ̅ⲥ̅ ⲇⲉ ⲙⲁⲣⲉϥϥⲓ ⲛⲁⲓ̈ <text:line-break/><text:span text:style-name="T1"> </text:span><text:span text:style-name="T2">(36/21) </text:span> ϩⲣⲁⲓ̈ ⲛ̅ϩⲏⲧϥ̅· ϩⲛ̅ ⲧⲙⲉϩⲙⲏⲧⲉ <text:line-break/><text:span text:style-name="T1"> </text:span><text:span text:style-name="T2">(36/22) </text:span> ⲛ̅[ⲣⲟ]ⲙⲡⲉ ⲉϥ〈ⲉ〉ϩⲙⲟⲟⲥ ⲛ̅ϭⲓ ⲁⲇⲇⲉ‐ <text:line-break/><text:span text:style-name="T1"> </text:span><text:span text:style-name="T2">(36/23) </text:span> [ⲟⲥ] ⲁ̣ⲩⲱ ⲉϥⲉⲥϩⲁⲓ̈ⲥⲟⲩ· ⲁⲩⲱ̣ <text:line-break/><text:span text:style-name="T1"> </text:span><text:span text:style-name="T2">(36/24) </text:span> [ⲉϣⲱ]ⲡⲉ ⲉϥϣⲁⲛⲥϩⲏⲧⲟⲩ <text:line-break/><text:span text:style-name="T1"> </text:span><text:span text:style-name="T2">(36/25) </text:span> [..]ⲧ̣ⲟ[..] ⲁⲩⲱ ⲉⲩⲉⲧⲁⲁⲩ <text:line-break/><text:span text:style-name="T1"> </text:span><text:span text:style-name="T2">(36/26) </text:span> [ 9+- ]ⲟⲩⲛ̅ⲧⲁϥ ⲙ̅ⲡ[ <text:line-break/><text:span text:style-name="T1"> </text:span><text:span text:style-name="T2">(36/27) </text:span> [ 8+- ] ⲙ̣ⲁϥ[ <text:line-break/><text:span text:style-name="T1"> </text:span><text:span text:style-name="T2">(36/28) </text:span> (2+- lines lacking) <text:line-break/><text:span text:style-name="T1"> </text:span><text:span text:style-name="T2">(37/2) </text:span> (lines 1 and 2 lacking) <text:line-break/><text:span text:style-name="T1"> </text:span><text:span text:style-name="T2">(37/3) </text:span> [ 7+- ].[ <text:line-break/><text:soft-page-break/><text:span text:style-name="T1"> </text:span><text:span text:style-name="T2">(37/4) </text:span> ⲱ̣[.....] ϣⲁⲛ[ 6+-]. <text:line-break/><text:span text:style-name="T1"> </text:span><text:span text:style-name="T2">(37/5) </text:span> ⲙⲓⲙ[...] ⲛ̅ϭⲓ ⲡ[...]ⲟⲩⲛ̣ <text:line-break/><text:span text:style-name="T1"> </text:span><text:span text:style-name="T2">(37/6) </text:span> ⲛ̅ϣ[....]. ϣⲁⲩϯ ⲡ̣ⲉϥ[ⲣⲁ]ⲛ <text:line-break/><text:span text:style-name="T1"> </text:span><text:span text:style-name="T2">(37/7) </text:span> ϫⲉ ⲗ̅ⲉ̅ⲩ̅[̅ⲉ̅ⲓ̅]· ⲧⲟⲧⲉ ⲉϥⲉⲉⲓⲛⲉ <text:line-break/><text:span text:style-name="T1"> </text:span><text:span text:style-name="T2">(37/8) </text:span> ⲛ̣̅ⲛⲟⲩ[..] ⲛ̅ϣⲁϫⲉ ⲉⲃⲟⲗ <text:line-break/><text:span text:style-name="T1"> </text:span><text:span text:style-name="T2">(37/9) </text:span> .ⲛ. [...]ⲧⲟⲩ· ⲉⲃⲟⲗ ϩⲛ̅ <text:line-break/><text:span text:style-name="T1"> </text:span><text:span text:style-name="T2">(37/10) </text:span> [ⲛⲁⲓ̈ ⲛ̅ⲧⲁⲓ̈ⲣ̅] ϣⲟⲣⲡ’ ⲛ̅ϫⲟⲟⲩ <text:line-break/><text:span text:style-name="T1"> </text:span><text:span text:style-name="T2">(37/11) </text:span> [.....] ⲛ̅ⲛⲟⲩⲥ{ϩ̅ⲓ}ⲙⲉ ⲛ̅ <text:line-break/><text:span text:style-name="T1"> </text:span><text:span text:style-name="T2">(37/12) </text:span> [..ϩⲓⲉ]ⲣⲟ̣ⲩⲥⲁⲗⲏⲙ ϩⲙ̅ ⲡⲉⲥ <text:line-break/><text:span text:style-name="T1"> </text:span><text:span text:style-name="T2">(37/13) </text:span> [ 6+-ⲁⲩ]ⲱ ⲉϥϫⲡⲟ ⲛ̅ϣⲏ‐ <text:line-break/><text:span text:style-name="T1"> </text:span><text:span text:style-name="T2">(37/14) </text:span> [ⲣⲉ ⲥⲛⲁ]ⲩ ⲉⲃⲟⲗ ⲛ̅ϩⲏⲧⲥ̅· <text:line-break/><text:span text:style-name="T1"> </text:span><text:span text:style-name="T2">(37/15) </text:span> [ⲉⲩⲉⲣ̅]ⲕⲗⲏⲣⲟⲛⲟⲙⲓ ⲛ̅ⲛⲁⲓ̈ <text:line-break/><text:span text:style-name="T1"> </text:span><text:span text:style-name="T2">(37/16) </text:span> [ⲙⲛ̅] ϯⲇⲓⲁⲛⲟⲓⲁ ⲙ̅ⲡⲏ ⲉⲧⲛⲉ <text:line-break/><text:span text:style-name="T1"> </text:span><text:span text:style-name="T2">(37/17) </text:span> [..]. ⲉϫⲓⲥⲉ· ⲁⲩⲱ ⲉⲩⲉϥⲓ <text:line-break/><text:span text:style-name="T1"> </text:span><text:span text:style-name="T2">(37/18) </text:span> ⲛ̣̅[..] ⲛ̅ⲧⲟⲟⲧϥ̅ ⲉⲃⲟⲗ ϩⲙ̅ ⲡⲉϥ‐ <text:line-break/><text:span text:style-name="T1"> </text:span><text:span text:style-name="T2">(37/19) </text:span> ⲛⲟⲩⲥ· ⲉⲣⲉ ⲡⲓⲕⲟⲩⲉⲓ ⲇⲉ <text:line-break/><text:span text:style-name="T1"> </text:span><text:span text:style-name="T2">(37/20) </text:span> ⲉϥⲁ{ⲉ̅ⲓ}ⲁⲓ̈ ⲛ̅ϩⲏⲧⲟⲩ· ⲁⲩⲱ <text:line-break/><text:span text:style-name="T1"> </text:span><text:span text:style-name="T2">(37/21) </text:span> ⲙⲁⲣⲉ ⲛⲁⲓ̈ ϣⲱⲡⲉ ⲛⲁϥ̣ <text:line-break/><text:span text:style-name="T1"> </text:span><text:span text:style-name="T2">(37/22) </text:span> ⲉⲩϩⲏⲡ’ ⲛ̅ϩⲏⲧϥ̅ ϣⲁ[ⲛⲧϥ]‐ <text:line-break/><text:span text:style-name="T1"> </text:span><text:span text:style-name="T2">(37/23) </text:span> {ⲉ̅ⲓ} ⲉϩⲣⲁⲓ̈ ⲉⲧⲁⲉⲓⲏ ⲙ̅ⲙ̣[ⲛ̅ⲧ]‐ <text:line-break/><text:span text:style-name="T1"> </text:span><text:span text:style-name="T2">(37/24) </text:span> ⲥ̣ⲁϣϥⲉ ⲛ̅ⲣⲟⲙⲡⲉ[ <text:line-break/><text:span text:style-name="T1"> </text:span><text:span text:style-name="T2">(37/25) </text:span> [...ⲉⲃ]ⲟⲗ[ <text:line-break/><text:span text:style-name="T1"> </text:span><text:span text:style-name="T2">(37/26) </text:span> (4+- lines lacking) <text:line-break/><text:span text:style-name="T1"> </text:span><text:span text:style-name="T2">(38/2) </text:span> (lines 1 and 2 lacking) <text:line-break/><text:span text:style-name="T1"> </text:span><text:span text:style-name="T2">(38/3) </text:span> [ 8+- ]ⲏⲓ̣[ 7+- ⲁ]ⲣ <text:line-break/><text:span text:style-name="T1"> </text:span><text:span text:style-name="T2">(38/4) </text:span> ⲭⲏ̣[.....]. ⲛ̅.[.....].[.]ⲟⲩ <text:line-break/><text:span text:style-name="T1"> </text:span><text:span text:style-name="T2">(38/5) </text:span> ϩⲛ̅ ⲉ̣ⲃⲟ̣[ⲗ {ϩ̅]̅ⲓ̣̅}ⲧⲟⲟ[ⲧⲟⲩ ⲉ]ⲩ̣ⲉⲡⲱⲧ’ <text:line-break/><text:span text:style-name="T1"> </text:span><text:span text:style-name="T2">(38/6) </text:span> ⲛ̅ⲥ̣ⲱ̣ϥ ⲉⲙⲁⲧⲉ ⲉ[ⲩ{ϩ̅ⲓ}]ⲧ̣ⲟⲟⲧⲟⲩ <text:line-break/><text:span text:style-name="T1"> </text:span><text:span text:style-name="T2">(38/7) </text:span> ⲛ̅ⲛⲉϥϣⲃⲏⲣ ⲛ̅[..]. ⲉⲩⲉⲧⲁ‐ <text:line-break/><text:span text:style-name="T1"> </text:span><text:span text:style-name="T2">(38/8) </text:span> ϣⲉⲟⲉⲓϣ̣ ⲙ̣̅[ⲙⲟ]ϥ̣ {ϩ̅[̅ⲓ}ⲧⲟⲟ]ⲧ̣ⲟⲩ <text:line-break/><text:span text:style-name="T1"> </text:span><text:span text:style-name="T2">(38/9) </text:span> ⲁⲩⲱ ⲡⲉⲓ̈ϣⲁϫⲉ [ⲉⲩⲉⲧ]ⲁϣ[ⲉ] <text:line-break/><text:span text:style-name="T1"> </text:span><text:span text:style-name="T2">(38/10) </text:span> ⲟⲉⲓϣ ⲙ̅ⲙⲟϥ· ⲧ̣[ⲟⲧⲉ ⲉϥⲉ]ϣ̣[ⲱ̅] <text:line-break/><text:span text:style-name="T1"> </text:span><text:span text:style-name="T2">(38/11) </text:span> ⲡⲉ ⲛ̅ⲟⲩϭⲣⲁϭ ⲛ̅ⲧⲉ[ <text:line-break/><text:span text:style-name="T1"> </text:span><text:span text:style-name="T2">(38/12) </text:span> ⲡⲉϫⲉ ⲓ̈ⲁⲕⲱⲃⲟⲥ ϫⲉ ⲁ̣[ⲛⲟⲕ ⲇⲉ ϯ]‐ <text:line-break/><text:span text:style-name="T1"> </text:span><text:span text:style-name="T2">(38/13) </text:span> ⲧ̣ⲱⲧ’ ⲛ̅ϩⲏⲧ[ <text:line-break/><text:span text:style-name="T1"> </text:span><text:span text:style-name="T2">(38/14) </text:span> ⲁⲩⲱ ⲥⲉϣⲟⲟⲡ’ ⲕ.[ <text:line-break/><text:span text:style-name="T1"> </text:span><text:span text:style-name="T2">(38/15) </text:span> ⲧⲁⲯⲩⲭⲏ· ⲉⲧⲓ ⲡⲓⲕ[ⲉϣⲁϫⲉ] <text:line-break/><text:span text:style-name="T1"> </text:span><text:span text:style-name="T2">(38/16) </text:span> ϯϣⲓⲛⲉ ⲙ̅ⲙⲟⲕ ⲉⲣ[ⲟϥ] ϯ[ⲥⲁϣ]ϥ̣ⲉ <text:line-break/><text:span text:style-name="T1"> </text:span><text:span text:style-name="T2">(38/17) </text:span> ⲛ̅ⲥ{ϩ̅ⲓ}ⲙⲉ ⲛⲓⲙ ⲛⲉ ⲛ̅ⲧⲁⲩ[ⲣ̅ ⲙⲁ]‐ <text:line-break/><text:span text:style-name="T1"> </text:span><text:span text:style-name="T2">(38/18) </text:span> ⲑⲏⲧⲏⲥ ⲛⲁⲕ· ⲁⲩⲱ ⲉⲓⲥ ϩ[ⲏⲏⲧⲉ] <text:line-break/><text:span text:style-name="T1"> </text:span><text:span text:style-name="T2">(38/19) </text:span> ⲥⲉⲣ̅ⲙⲁⲕⲁⲣⲓⲍⲉ ⲙ̅ⲙⲟⲕ̣ [ⲛ̅]ϭⲓ ⲥ{ϩ̅ⲓ}‐ <text:line-break/><text:span text:style-name="T1"> </text:span><text:span text:style-name="T2">(38/20) </text:span> ⲙⲉ ⲛⲓⲙ· ⲁⲛⲟⲕ ϩⲱ ϯⲣ̅ ϣⲡⲏⲣⲉ <text:line-break/><text:span text:style-name="T1"> </text:span><text:span text:style-name="T2">(38/21) </text:span> ϫⲉ ⲡⲱⲥ ϩⲉⲛⲁⲅ’ⲅⲓⲟⲛ ⲛ̅ⲛⲁⲧ’ <text:line-break/><text:span text:style-name="T1"> </text:span><text:span text:style-name="T2">(38/22) </text:span> [ϭⲟⲙ]̓ ⲁⲩϭⲙ̅ϭⲟⲙ ϩⲛ̅ ⲟⲩⲉⲥⲑ[ⲏ]‐ <text:line-break/><text:span text:style-name="T1"> </text:span><text:span text:style-name="T2">(38/23) </text:span> [ⲥⲓⲥ] ⲉⲥϣⲟⲟⲡ’ ⲛ̅ϩⲏⲧⲟⲩ· ⲡ̣[ⲉ]‐ <text:line-break/><text:span text:style-name="T1"> </text:span><text:span text:style-name="T2">(38/24) </text:span> [ϫⲉ ⲡϫ]ⲟⲉⲓⲥ ϫⲉ ⲕⲁⲗⲱⲥ ⲕⲣ̅[ <text:line-break/><text:span text:style-name="T1"> </text:span><text:span text:style-name="T2">(38/25) </text:span> [ 9+- ]..[ <text:line-break/><text:soft-page-break/><text:span text:style-name="T1"> </text:span><text:span text:style-name="T2">(38/26) </text:span> (4+- lines lacking) <text:line-break/><text:span text:style-name="T1"> </text:span><text:span text:style-name="T2">(39/1) </text:span> (line 1 lacking) <text:line-break/><text:span text:style-name="T1"> </text:span><text:span text:style-name="T2">(39/2) </text:span> [ 7+- ].[ <text:line-break/><text:span text:style-name="T1"> </text:span><text:span text:style-name="T2">(39/3) </text:span> ⲧ.ⲯ[....ⲟ]ⲩ̣ⲡ̅ⲛ̅ⲁ̣̅̅[ ⲛ̅... <text:line-break/><text:span text:style-name="T1"> </text:span><text:span text:style-name="T2">(39/4) </text:span> ⲟⲩⲡ̅[̅ⲛ̅ⲁ̅ ⲙ̅]ⲡ̣ⲙⲉⲩ̣[ⲉ ⲟⲩⲡ̅ⲛ]ⲁ̣̅ <text:line-break/><text:span text:style-name="T1"> </text:span><text:span text:style-name="T2">(39/5) </text:span> ⲛ̅ϣⲟϫ[ⲛⲉ] ⲛ̅ⲛⲟ̣[ⲩ ] <text:line-break/><text:span text:style-name="T1"> </text:span><text:span text:style-name="T2">(39/6) </text:span> ⲟⲩⲡⲛ̅ⲁ̅[ 6+-ⲟⲩ]ⲡ̅ⲛ̅ⲁ̅ <text:line-break/><text:span text:style-name="T1"> </text:span><text:span text:style-name="T2">(39/7) </text:span> ⲛ̅ⲅⲛⲱ[ⲥⲓⲥ] ⲟ̣[...] ⲛ̣̅ⲧⲉⲩ‐ <text:line-break/><text:span text:style-name="T1"> </text:span><text:span text:style-name="T2">(39/8) </text:span> ʹ26ϩⲟⲧ[ⲉ...]ⲡ̣ⲉ ⲛ̅ⲧ̣ⲁⲣⲉⲛⲥⲓⲛⲉ <text:line-break/><text:span text:style-name="T1"> </text:span><text:span text:style-name="T2">(39/9) </text:span> ϩⲛ̅ [ⲡⲓⲟⲩ]ⲱ̣ϣⲥ̅ ⲛ̅ⲧⲉ <text:line-break/><text:span text:style-name="T1"> </text:span><text:span text:style-name="T2">(39/10) </text:span> [ⲡⲉⲓ̈ⲁⲣ]ⲭⲱⲛ· ⲡⲏ ⲉϣⲁⲩ‐ <text:line-break/><text:span text:style-name="T1"> </text:span><text:span text:style-name="T2">(39/11) </text:span> [ⲙⲟⲩⲧⲉ ⲉⲣⲟϥ] ϫⲉ̣ ⲁ̅ⲇ̅ⲱ̅ⲛ̅ⲁ̅ⲓ̅ⲟ̅ⲥ̅ <text:line-break/><text:span text:style-name="T1"> </text:span><text:span text:style-name="T2">(39/12) </text:span> [ 11+- ]ⲉⲣⲟϥ ⲁⲩⲱ <text:line-break/><text:span text:style-name="T1"> </text:span><text:span text:style-name="T2">(39/13) </text:span> [...ⲛ]ⲁ̣ϥⲉ ⲛ̅ⲛⲁⲧ’ⲉⲓⲙⲉ· <text:line-break/><text:span text:style-name="T1"> </text:span><text:span text:style-name="T2">(39/14) </text:span> [..ⲛ̅ⲧ]ⲁⲣⲓ{ⲉ̅ⲓ} ⲉⲃⲟⲗ ⲛ̅ϩⲏⲧϥ̅ <text:line-break/><text:span text:style-name="T1"> </text:span><text:span text:style-name="T2">(39/15) </text:span> [ⲁϥⲣ̅ ⲡⲙ]ⲉ̣ⲉⲩⲉ ϫⲉ ⲁⲛⲟⲕ <text:line-break/><text:span text:style-name="T1"> </text:span><text:span text:style-name="T2">(39/16) </text:span> [ⲟⲩ]ϣⲏⲣⲉ ⲛ̅ⲧⲁϥ· ⲁϥⲣ̅ ϩⲙⲟⲧ’ <text:line-break/><text:span text:style-name="T1"> </text:span><text:span text:style-name="T2">(39/17) </text:span> [ⲛⲁⲓ̈] ⲙ̅ⲡⲓⲟⲩⲟⲉⲓϣ ϩⲱⲥ ⲉⲩ‐ <text:line-break/><text:span text:style-name="T1"> </text:span><text:span text:style-name="T2">(39/18) </text:span> ϣⲏⲣⲉ ⲛ̅ⲧⲁϥ ⲡⲉ ⲁⲩⲱ ⲧⲟ‐ <text:line-break/><text:span text:style-name="T1"> </text:span><text:span text:style-name="T2">(39/19) </text:span> ⲧⲉ ⲁⲛⲟⲕ ϩⲁⲑⲏ ⲉⲙⲡⲁ〈ϯ〉ⲟⲩ‐ <text:line-break/><text:span text:style-name="T1"> </text:span><text:span text:style-name="T2">(39/20) </text:span> ⲱⲛϩ̅ ⲉⲃⲟⲗ ⲙ̅ⲡⲉⲓ̈ⲙⲁ ⲁ〈ϥ〉‐ <text:line-break/><text:span text:style-name="T1"> </text:span><text:span text:style-name="T2">(39/21) </text:span> ⲛⲟⲩϫⲉ ⲙ̅ⲙⲟⲟⲩ ϩⲙ̅ [ⲡⲉⲓ̈]‐ <text:line-break/><text:span text:style-name="T1"> </text:span><text:span text:style-name="T2">(39/22) </text:span> ⲗⲁⲟⲥ· ⲉⲃⲟⲗ ⲇⲉ ϩⲙ̅ ⲡ[ⲙⲁ] <text:line-break/><text:span text:style-name="T1"> </text:span><text:span text:style-name="T2">(39/23) </text:span> ⲙ̅ⲡⲉ ⲛⲓⲡⲣⲟⲫ[ⲏⲧⲏⲥ <text:line-break/><text:span text:style-name="T1"> </text:span><text:span text:style-name="T2">(39/24) </text:span> ⲡⲟ̣[ <text:line-break/><text:span text:style-name="T1"> </text:span><text:span text:style-name="T2">(39/25) </text:span> .̅[ <text:line-break/><text:span text:style-name="T1"> </text:span><text:span text:style-name="T2">(39/26) </text:span> (4+- lines lacking) <text:line-break/><text:span text:style-name="T1"> </text:span><text:span text:style-name="T2">(40/1) </text:span> (line 1 lacking) <text:line-break/><text:span text:style-name="T1"> </text:span><text:span text:style-name="T2">(40/2) </text:span> [ 18+- ]. <text:line-break/><text:span text:style-name="T1"> </text:span><text:span text:style-name="T2">(40/3) </text:span> [ 6+-]ⲙⲉ̣[.....]ϫ̣ⲱ̣ⲕ· <text:line-break/><text:span text:style-name="T1"> </text:span><text:span text:style-name="T2">(40/4) </text:span> .[..ⲡⲉϫⲉ ⲓ̈]ⲁ̣ⲕⲱ̣[ⲃⲟⲥ ϫ]ⲉ ϩⲣⲁⲃⲃⲓ <text:line-break/><text:span text:style-name="T1"> </text:span><text:span text:style-name="T2">(40/5) </text:span> ⲁ[....]. ⲁϩⲏ.[..].ⲛⲁⲓ̈· <text:line-break/><text:span text:style-name="T1"> </text:span><text:span text:style-name="T2">(40/6) </text:span> ϯ[ 10+- ]ⲩ {ϩ̅ⲓ}ⲟⲩⲥⲟⲡ’ <text:line-break/><text:span text:style-name="T1"> </text:span><text:span text:style-name="T2">(40/7) </text:span> ⲛⲓⲙ.[ 7+- ]ⲧ’̣ ⲛ̅ϩⲏⲧⲟⲩ <text:line-break/><text:span text:style-name="T1"> </text:span><text:span text:style-name="T2">(40/8) </text:span> ⲛ̅ϩⲟⲩ[ⲟ 6+- ]ⲉ̣[...]ⲩⲉ· <text:line-break/><text:span text:style-name="T1"> </text:span><text:span text:style-name="T2">(40/9) </text:span> ⲡⲉϫⲉ ⲡϫⲟⲉ̣ⲓ̣ⲥ ϫ̣ⲉ ⲓ̣̈[ⲁⲕⲱⲃ]ⲟⲥ ϯ‐ <text:line-break/><text:span text:style-name="T1"> </text:span><text:span text:style-name="T2">(40/10) </text:span> ⲧⲙⲁⲉⲓⲟ ⲙ̅ⲙⲟⲕ̣[.....].. <text:line-break/><text:span text:style-name="T1"> </text:span><text:span text:style-name="T2">(40/11) </text:span> ⲧⲁⲗⲉ ⲡⲧⲟ ⲛⲙ̅ⲡ̣[ <text:line-break/><text:span text:style-name="T1"> </text:span><text:span text:style-name="T2">(40/12) </text:span> ⲛ̅ϣⲁϫⲉ ⲉϥⲉ ⲛ̅ⲙ̣[ <text:line-break/><text:span text:style-name="T1"> </text:span><text:span text:style-name="T2">(40/13) </text:span> ϫⲙ̅ ⲡϣ.[ <text:line-break/><text:span text:style-name="T1"> </text:span><text:span text:style-name="T2">(40/14) </text:span> ⲛⲟⲩϫⲉ ⲅⲁⲣ ⲉⲃⲟⲗ ⲙ̅ⲙ̣[ⲟⲕ ⲙ̅ⲡⲁ]‐ <text:line-break/><text:span text:style-name="T1"> </text:span><text:span text:style-name="T2">(40/15) </text:span> ⲡⲟⲧ’ ⲡⲁⲓ̈ ⲡⲉ ⲡⲥⲓϣ[ⲉ ⲟⲩⲛ̅ ϩⲉⲛ]‐ <text:line-break/><text:span text:style-name="T1"> </text:span><text:span text:style-name="T2">(40/16) </text:span> ⲗⲁⲁⲩ ⲅⲁⲣ ⲉⲃⲟⲗ ϩⲛ̣̅[ <text:line-break/><text:span text:style-name="T1"> </text:span><text:span text:style-name="T2">(40/17) </text:span> ⲁϩⲉⲣⲁⲧⲟⲩ ⲟⲩⲃⲏⲕ̣[·] ⲁ̣[ⲕ{ϩ̅ⲓ} ⲧⲟ]‐ <text:line-break/><text:span text:style-name="T1"> </text:span><text:span text:style-name="T2">(40/18) </text:span> ⲟⲧⲕ̅ ⲅⲁⲣ ⲉⲥⲟⲩⲱⲛ ⲛⲉ[ⲩⲛⲟⲩ]‐ <text:line-break/><text:span text:style-name="T1"> </text:span><text:span text:style-name="T2">(40/19) </text:span> ⲛⲉ ϫⲓⲛ ϣⲟⲣⲡ̅’ ϣⲁ ϩⲁⲉ· ⲛ̣ⲟⲩϫⲉ̣ <text:line-break/><text:span text:style-name="T1"> </text:span><text:span text:style-name="T2">(40/20) </text:span> ⲉⲃⲟⲗ ⲙ̅ⲙⲟⲕ ⲛ̅ⲁⲛⲟⲙⲓⲁ ⲛⲓⲙ· <text:line-break/><text:soft-page-break/><text:span text:style-name="T1"> </text:span><text:span text:style-name="T2">(40/21) </text:span> ⲁⲩⲱ ⲙⲁϯ ϩⲧⲏⲕ ⲙⲏⲡⲱⲥ ⲛ̅‐ <text:line-break/><text:span text:style-name="T1"> </text:span><text:span text:style-name="T2">(40/22) </text:span> ⲥ̣ⲉ̣ⲕ̣ⲱϩ ⲉⲣⲟⲕ· ⲉϣⲱⲡⲉ ⲉⲕ‐ <text:line-break/><text:span text:style-name="T1"> </text:span><text:span text:style-name="T2">(40/23) </text:span> [ϣⲁ]ⲛ̣ϫⲉ ⲛⲉⲓ̈ϣⲁϫⲉ ⲛ̅ⲧⲉ ⲧⲉⲓ̈‐ <text:line-break/><text:span text:style-name="T1"> </text:span><text:span text:style-name="T2">(40/24) </text:span> [ⲉⲥⲑ]ⲏ̣ⲥⲓⲥ ⲧⲱⲧ’ ⲛ̅ϩⲏⲧ’ ⲙ̅ⲡⲉⲉⲓ‐ <text:line-break/><text:span text:style-name="T1"> </text:span><text:span text:style-name="T2">(40/25) </text:span> [ϥⲧⲟⲟⲩ] ⲥ̅ⲁ̅ⲗ̅ⲱ̅ⲙ̅ⲏ̅ ⲙⲛ̅ ⲙ̅ⲁⲣⲓⲁⲙ̅ <text:line-break/><text:span text:style-name="T1"> </text:span><text:span text:style-name="T2">(40/26) </text:span> [ⲙⲛ̅ ⲙ̅ⲁ̅ⲣ̅ⲑ̅ⲁ̅ ⲙⲛ̅ {2ⲁⲣⲥ]ⲓⲛⲟⲏ}2 <text:line-break/><text:span text:style-name="T1"> </text:span><text:span text:style-name="T2">(40/27) </text:span> [ 14+- ]ⲧⲕ̅ <text:line-break/><text:span text:style-name="T1"> </text:span><text:span text:style-name="T2">(40/28) </text:span> [ 14+- ]ⲧ’· <text:line-break/><text:span text:style-name="T1"> </text:span><text:span text:style-name="T2">(40/29) </text:span> [ 15+- ]. <text:line-break/><text:span text:style-name="T1"> </text:span><text:span text:style-name="T2">(41/2) </text:span> (lines 1 and 2 lacking) <text:line-break/><text:span text:style-name="T1"> </text:span><text:span text:style-name="T2">(41/3) </text:span> ⲉ..[ <text:line-break/><text:span text:style-name="T1"> </text:span><text:span text:style-name="T2">(41/4) </text:span> ⲭⲏ ⲉⲩ[ 12+- ]ⲛ <text:line-break/><text:span text:style-name="T1"> </text:span><text:span text:style-name="T2">(41/5) </text:span> ⲙⲛ̅ⲧ’[ 13+- ]ⲉ̣ <text:line-break/><text:span text:style-name="T1"> </text:span><text:span text:style-name="T2">(41/6) </text:span> ⲡⲟⲩⲏ[ 9+- ]ⲥ ⲉϣⲁϥ‐ <text:line-break/><text:span text:style-name="T1"> </text:span><text:span text:style-name="T2">(41/7) </text:span> ϫⲓ ⲛ̅ϩⲉⲛ̣[ 7+- ]ⲱ ⲛⲁⲓ̈ <text:line-break/><text:span text:style-name="T1"> </text:span><text:span text:style-name="T2">(41/8) </text:span> ϣⲁϥ̣.[.....]ϩⲉⲛϭⲗⲓⲗ <text:line-break/><text:span text:style-name="T1"> </text:span><text:span text:style-name="T2">(41/9) </text:span> ⲙⲛ̅[.....]ⲫⲟⲣⲁ· ⲁⲛⲟⲕ ⲇⲉ <text:line-break/><text:span text:style-name="T1"> </text:span><text:span text:style-name="T2">(41/10) </text:span> [ 7+- ⲛ̅]ⲧⲉⲓ̈ϩⲉ ⲁⲛ· ⲁⲗⲗⲁ <text:line-break/><text:span text:style-name="T1"> </text:span><text:span text:style-name="T2">(41/11) </text:span> [....ⲁ]ⲡ̣ⲁⲣⲭⲏ ⲛ̅ⲧⲉ ⲛⲓⲁⲧ’ <text:line-break/><text:span text:style-name="T1"> </text:span><text:span text:style-name="T2">(41/12) </text:span> [ 14+- ] ⲉⲧⲡⲉ <text:line-break/><text:span text:style-name="T1"> </text:span><text:span text:style-name="T2">(41/13) </text:span> [.....]ⲁⲣⲟⲩ [ϫ]ⲉ̣ⲕⲁⲁⲥ <text:line-break/><text:span text:style-name="T1"> </text:span><text:span text:style-name="T2">(41/14) </text:span> [ⲉⲥⲉⲟⲩ]ⲱⲛϩ̅ ⲉⲃⲟⲗ ⲛ̅ϭⲓ ⲧϭⲟⲙ <text:line-break/><text:span text:style-name="T1"> </text:span><text:span text:style-name="T2">(41/15) </text:span> [ⲙ̅ⲡⲛⲟⲩⲧ]ⲉ̣ ⲁⲡⲓⲧⲁⲕⲟ ⲁϥⲣ̅ⲭⲱⲣ̣ⲓ̣ <text:line-break/><text:span text:style-name="T1"> </text:span><text:span text:style-name="T2">(41/16) </text:span> [ⲉϩⲣ]ⲁⲓ̣̈ ⲉⲡⲓⲁⲧ’ⲧⲁⲕⲟ· ⲁⲩⲱ <text:line-break/><text:span text:style-name="T1"> </text:span><text:span text:style-name="T2">(41/17) </text:span> [ⲫ]ⲱⲃ ⲛ̅ϯⲙⲛ̅ⲧ’ⲥ{ϩ̅ⲓ}ⲙⲉ ⲁϥⲣ̅‐ <text:line-break/><text:span text:style-name="T1"> </text:span><text:span text:style-name="T2">(41/18) </text:span> ⲕⲁⲧⲁⲛⲧⲁ ⲉϩⲣⲁⲓ̈ ⲉⲫⲱⲃ ⲛ̅ⲧⲉⲓ̈‐ <text:line-break/><text:span text:style-name="T1"> </text:span><text:span text:style-name="T2">(41/19) </text:span> ⲙⲛ̅ⲧ’ϩⲟⲟⲩⲧ’· ⲡⲉϫⲉ ⲓ̈ⲁⲕⲱⲃⲟⲥ <text:line-break/><text:span text:style-name="T1"> </text:span><text:span text:style-name="T2">(41/20) </text:span> ϫⲉ ϩⲣⲁⲃⲃⲓ ⲉϯϣⲟⲙⲧⲉ ⲟⲩⲛ ⲛ̅‐ <text:line-break/><text:span text:style-name="T1"> </text:span><text:span text:style-name="T2">(41/21) </text:span> ⲧⲁⲩⲛⲟⲩϫⲉ ⲙ̅ⲡⲉⲩ.[ <text:line-break/><text:span text:style-name="T1"> </text:span><text:span text:style-name="T2">(41/22) </text:span> ⲁⲩ→ⲟ←ϣⲟⲩ ⲅⲁⲣ ⲕⲁ̣ⲓ̣ ⲅ̣[ⲁⲣ ⲁⲩ]‐ <text:line-break/><text:span text:style-name="T1"> </text:span><text:span text:style-name="T2">(41/23) </text:span> ⲡⲱⲧ’ ⲛ̅ⲥⲱⲟⲩ..ⲣ̣[ <text:line-break/><text:span text:style-name="T1"> </text:span><text:span text:style-name="T2">(41/24) </text:span> ⲟⲧ̣[..]ⲛ̅[ <text:line-break/><text:span text:style-name="T1"> </text:span><text:span text:style-name="T2">(41/25) </text:span> ⲁⲩ[ <text:line-break/><text:span text:style-name="T1"> </text:span><text:span text:style-name="T2">(41/26) </text:span> (4+- lines lacking) <text:line-break/><text:span text:style-name="T1"> </text:span><text:span text:style-name="T2">(42/3) </text:span> (lines 1-3 lacking) <text:line-break/><text:span text:style-name="T1"> </text:span><text:span text:style-name="T2">(42/4) </text:span> [ 15+- ]ⲛ̅ⲛ̅ⲁ̅· <text:line-break/><text:span text:style-name="T1"> </text:span><text:span text:style-name="T2">(42/5) </text:span> [ 12+- ⲉⲓⲥ] ϩⲏⲧⲉ <text:line-break/><text:span text:style-name="T1"> </text:span><text:span text:style-name="T2">(42/6) </text:span> ⲁ[ 10+- ]ⲛ̅ϩⲱⲃ <text:line-break/><text:span text:style-name="T1"> </text:span><text:span text:style-name="T2">(42/7) </text:span> ⲛⲓⲙ· ⲁ̣[ 9+- ]ⲉⲃⲟⲗ ϩⲛ̅ <text:line-break/><text:span text:style-name="T1"> </text:span><text:span text:style-name="T2">(42/8) </text:span> ⲗⲁⲁⲩ ⲁ[ 7+- ]. ⲉ· <text:line-break/><text:span text:style-name="T1"> </text:span><text:span text:style-name="T2">(42/9) </text:span> ⲁⲕϫⲓ ⲅⲁⲣ ⲛ̅[.....]ⲏ ⲛ̅ⲧⲉ <text:line-break/><text:span text:style-name="T1"> </text:span><text:span text:style-name="T2">(42/10) </text:span> ⲟⲩⲅⲛⲱⲥⲓⲥ· ⲁⲩ[ⲱ <text:line-break/><text:span text:style-name="T1"> </text:span><text:span text:style-name="T2">(42/11) </text:span> ⲛⲟⲩ ϫⲉ ⲁϣ ⲡⲉ ⲡ[ <text:line-break/><text:span text:style-name="T1"> </text:span><text:span text:style-name="T2">(42/12) </text:span> ⲙⲟⲟϣ̣[ⲉ].̅[ <text:line-break/><text:span text:style-name="T1"> </text:span><text:span text:style-name="T2">(42/13) </text:span> ⲕⲛⲁϭ[ⲓⲛⲉ <text:line-break/><text:span text:style-name="T1"> </text:span><text:span text:style-name="T2">(42/14) </text:span> ⲁⲛⲟⲕ ⲇ[ⲉ] ϯⲛⲁⲃⲱ[ⲕ ⲉⲃⲟⲗ] <text:line-break/><text:span text:style-name="T1"> </text:span><text:span text:style-name="T2">(42/15) </text:span> ⲁⲩⲱ ϯⲛⲁⲟⲩⲱ[ⲛϩ̅ ⲉⲃⲟ]ⲗ̣ <text:line-break/><text:soft-page-break/><text:span text:style-name="T1"> </text:span><text:span text:style-name="T2">(42/16) </text:span> ϫⲉ ⲁⲩⲛⲁϩⲧⲉ ⲉⲣⲟⲕ̣ ϫ̣[ⲉ ⲉⲩⲉ]‐ <text:line-break/><text:span text:style-name="T1"> </text:span><text:span text:style-name="T2">(42/17) </text:span> ⲧⲱⲧ’ ⲛ̅ϩⲏⲧ’ ⲉϩⲣⲁⲓ̈ ⲉⲩⲥⲙ̣[ⲟⲩ] <text:line-break/><text:span text:style-name="T1"> </text:span><text:span text:style-name="T2">(42/18) </text:span> ⲛⲁⲩ ⲙⲛ̅ ⲟⲩⲟⲩϫⲁⲓ̈· ⲁⲩⲱ ⲛ̅ⲧⲉ <text:line-break/><text:span text:style-name="T1"> </text:span><text:span text:style-name="T2">(42/19) </text:span> ⲡⲉⲓ̈ⲟⲩⲱⲛϩ̅ ⲉⲃⲟⲗ ϣⲱⲡⲉ· <text:line-break/><text:span text:style-name="T1"> </text:span><text:span text:style-name="T2">(42/20) </text:span> ⲁⲩⲱ ⲁϥⲃⲱⲕ ⲙ̅ⲡⲓⲟⲩⲟⲉⲓϣ ⲛ̅‐ <text:line-break/><text:span text:style-name="T1"> </text:span><text:span text:style-name="T2">(42/21) </text:span> [ⲥⲁ]ⲧ̣[ⲟ]ⲟⲧϥ̅ ⲁϥⲥⲟϩⲉ ⲙ̅ⲡⲓⲙⲛ̅ⲧ’‐ <text:line-break/><text:span text:style-name="T1"> </text:span><text:span text:style-name="T2">(42/22) </text:span> [ⲥⲛⲟ]ⲟ̣ⲩⲥ̣· ⲁⲩⲱ ⲁϥⲛⲟⲩϫⲉ <text:line-break/><text:span text:style-name="T1"> </text:span><text:span text:style-name="T2">(42/23) </text:span> [ⲉⲃⲟⲗ] ⲛ̣̅ϩ[ⲏ]ⲧⲟⲩ ⲛ̅ⲟⲩⲧⲱⲧ’ ⲛϩ̅ⲏⲧ’ <text:line-break/><text:span text:style-name="T1"> </text:span><text:span text:style-name="T2">(42/24) </text:span> [ⲉⲧⲃⲉ ϯⲡ]ⲟⲣⲟⲓⲁ̣ ⲛ̅ⲧⲉ [ⲟ]ⲩⲅⲛⲱⲥⲓⲥ <text:line-break/><text:span text:style-name="T1"> </text:span><text:span text:style-name="T2">(42/25) </text:span> [ 14+- ]ⲓ̣ⲧ’ ϫⲉ <text:line-break/><text:span text:style-name="T1"> </text:span><text:span text:style-name="T2">(42/26) </text:span> [ 16+- ].ⲧⲟⲩ <text:line-break/><text:span text:style-name="T1"> </text:span><text:span text:style-name="T2">(42/27) </text:span> (3+- lines lacking) <text:line-break/><text:span text:style-name="T1"> </text:span><text:span text:style-name="T2">(43/2) </text:span> (lines 1 and 2 lacking) <text:line-break/><text:span text:style-name="T1"> </text:span><text:span text:style-name="T2">(43/3) </text:span> [.]ⲛ̣.[ <text:line-break/><text:span text:style-name="T1"> </text:span><text:span text:style-name="T2">(43/4) </text:span> ⲛ̣ⲉⲓ̈ⲁ[ <text:line-break/><text:span text:style-name="T1"> </text:span><text:span text:style-name="T2">(43/5) </text:span> ⲡⲉⲓ̈ⲟⲥ̣[ <text:line-break/><text:span text:style-name="T1"> </text:span><text:span text:style-name="T2">(43/6) </text:span> ⲉⲡⲙⲁ[ 8+- ]ⲛ̣ⲧϥ̅ <text:line-break/><text:span text:style-name="T1"> </text:span><text:span text:style-name="T2">(43/7) </text:span> ⲛ̅ⲛⲁ ϩ.̅[ 6+-] ⲡ̣ⲉϩⲟⲩⲟ <text:line-break/><text:span text:style-name="T1"> </text:span><text:span text:style-name="T2">(43/8) </text:span> ⲇⲉ ⲛ̅ⲧ̣[ⲉⲩ....]ⲧ’̣ ⲛ̅ⲧⲉⲣⲟⲩ <text:line-break/><text:span text:style-name="T1"> </text:span><text:span text:style-name="T2">(43/9) </text:span> ⲛⲁ[ⲩ ⲁⲡⲓⲣ]ⲙ̅ⲛ̅ϩⲱⲃ ϫⲓ ⲉϩⲟⲩⲛ <text:line-break/><text:span text:style-name="T1"> </text:span><text:span text:style-name="T2">(43/10) </text:span> [ 6+-]ⲁϥ ⲉⲃⲟⲗ· ⲛⲓⲕⲉ <text:line-break/><text:span text:style-name="T1"> </text:span><text:span text:style-name="T2">(43/11) </text:span> [ 6+-].̅ⲡⲗ..ⲁⲩⲁ <text:line-break/><text:span text:style-name="T1"> </text:span><text:span text:style-name="T2">(43/12) </text:span> [ 12+- ϫ]ⲱ ⲙ̅ⲙⲟⲥ <text:line-break/><text:span text:style-name="T1"> </text:span><text:span text:style-name="T2">(43/13) </text:span> [.....] ⲟⲩⲛ ⲉϩⲣ[ⲁ]ⲓ̣̈· ϫⲉ ⲙⲁ <text:line-break/><text:span text:style-name="T1"> </text:span><text:span text:style-name="T2">(43/14) </text:span> [.... ⲙ̅ⲡ]ⲁⲓ̈ ⲉⲃⲟⲗ ϩⲙ̅ ⲡⲉⲓ̈ⲕⲁϩ <text:line-break/><text:span text:style-name="T1"> </text:span><text:span text:style-name="T2">(43/15) </text:span> [ⲛ̅ϥⲙ̅ⲡ]ϣ̣[ⲁ] ⲅⲁⲣ ⲙ̅ⲡⲱⲛϩ̅ ⲁⲛ· <text:line-break/><text:span text:style-name="T1"> </text:span><text:span text:style-name="T2">(43/16) </text:span> [ⲁⲩ]ⲣ̣̅ϩⲟⲧⲉ ⲟⲩⲛ ⲛ̅ϭⲓ ⲛⲁⲓ̈ ⲁⲩⲧⲱ‐ <text:line-break/><text:span text:style-name="T1"> </text:span><text:span text:style-name="T2">(43/17) </text:span> ⲟⲩⲛⲟⲩ ⲉⲩϫⲱ ⲙ̅ⲙⲟⲥ ϫⲉ ⲧⲛ̅‐ <text:line-break/><text:span text:style-name="T1"> </text:span><text:span text:style-name="T2">(43/18) </text:span> ⲕⲟⲓⲛⲱⲛⲓ ⲉⲡⲉⲓ̈ⲥⲛⲟϥ ⲁⲛ· <text:line-break/><text:span text:style-name="T1"> </text:span><text:span text:style-name="T2">(43/19) </text:span> ⲟⲩⲣⲱⲙⲉ ⲅⲁⲣ ⲛ̅ⲇⲓⲕⲁⲓⲟⲥ <text:line-break/><text:span text:style-name="T1"> </text:span><text:span text:style-name="T2">(43/20) </text:span> ⲉϥⲛⲁⲧⲁⲕⲟ ϩⲛ̅ⲛ ⲟⲩⲙ[ⲛ̅ⲧ]‐ <text:line-break/><text:span text:style-name="T1"> </text:span><text:span text:style-name="T2">(43/21) </text:span> ⲁⲇⲓⲕⲟⲥ· ⲁϥⲃⲱⲕ [ⲛ̅]ϭ̣[ⲓ ⲓ̈ⲁ]‐ <text:line-break/><text:span text:style-name="T1"> </text:span><text:span text:style-name="T2">(43/22) </text:span> ⲕⲱⲃ̣ⲟⲥ ϫⲉⲕⲁⲁ[ⲥ] .[ <text:line-break/><text:span text:style-name="T1"> </text:span><text:span text:style-name="T2">(43/23) </text:span> ⲛ[ <text:line-break/><text:span text:style-name="T1"> </text:span><text:span text:style-name="T2">(43/24) </text:span> (6+- lines lacking) <text:line-break/><text:span text:style-name="T1"> </text:span><text:span text:style-name="T2">(44/3) </text:span> (lines 1-3 lacking) <text:line-break/><text:span text:style-name="T1"> </text:span><text:span text:style-name="T2">(44/4) </text:span> [ 14+- ]ϣ̣· <text:line-break/><text:span text:style-name="T1"> </text:span><text:span text:style-name="T2">(44/5) </text:span> .[ 13+- ]ⲱⲧ’ <text:line-break/><text:span text:style-name="T1"> </text:span><text:span text:style-name="T2">(44/6) </text:span> .[ 12+- ]ⲛⲁⲩ <text:line-break/><text:span text:style-name="T1"> </text:span><text:span text:style-name="T2">(44/7) </text:span> ⲉⲃ̣[ⲟⲗ 7+- ] ⲅ̣ⲁⲣ <text:line-break/><text:span text:style-name="T1"> </text:span><text:span text:style-name="T2">(44/8) </text:span> ⲁⲛⲙ̅[ 6+-] ⲙ̣̅ⲙⲟϥ· <text:line-break/><text:span text:style-name="T1"> </text:span><text:span text:style-name="T2">(44/9) </text:span> 0ⲧⲁⲡⲟ̣ⲕⲁ̣ⲗ̣[ⲩⲯⲓⲥ] <text:line-break/><text:span text:style-name="T1"> </text:span><text:span text:style-name="T2">(44/10) </text:span> 0ⲛ̅ⲓ̈ⲁⲕⲱⲃ[ⲟⲥ] </text:p>
      <text:p text:style-name="P1"/>
      <text:p text:style-name="P3">( codex V ) The (Second) Apocalypse of James</text:p>
      <text:p text:style-name="P2"><text:span text:style-name="T1"> </text:span><text:span text:style-name="T2">(44/11) </text:span> ⲧⲁⲡ̣ⲟ̣ⲕⲁⲗⲩⲯ̣[ⲓⲥ] <text:line-break/><text:span text:style-name="T1"> </text:span><text:span text:style-name="T2">(44/12) </text:span> ⲛ̅ⲓ̈ⲁ̣[ⲕⲱⲃⲟⲥ] <text:line-break/><text:span text:style-name="T1"> </text:span><text:span text:style-name="T2">(44/13) </text:span> ⲡⲁⲓ̈ ⲡⲉ [ⲡ]ϣⲁϫⲉ ⲉ[ⲧⲁϥϣⲁ]‐ <text:line-break/><text:span text:style-name="T1"> </text:span><text:span text:style-name="T2">(44/14) </text:span> ϫⲉ ⲙ̅ⲙⲟϥ ⲛ̅ϭⲓ ⲓ̈ⲁⲕⲱ̣[ⲃⲟⲥ ⲡⲇⲓ]‐ <text:line-break/><text:span text:style-name="T1"> </text:span><text:span text:style-name="T2">(44/15) </text:span> ⲕⲁⲓⲟⲥ ϩⲛ̅ ⲑ̅ⲓ̅ⲏ̅ⲙ̅· ⲡ̣[ⲉ]ⲧ̣[ⲁϥ]‐ <text:line-break/><text:span text:style-name="T1"> </text:span><text:span text:style-name="T2">(44/16) </text:span> ⲥⲁϩϥ̅ ⲛ̅ϭⲓ ⲙ̅ⲁ̅ⲣ̅ⲉ̅ⲓ̅ⲙ̅· ⲟⲩⲁ [ⲛ̅]‐ <text:line-break/><text:span text:style-name="T1"> </text:span><text:span text:style-name="T2">(44/17) </text:span> ⲛⲓⲟⲩⲏⲏⲃ ⲁϥϫⲟⲟϥ ⲛ̅‐ <text:line-break/><text:span text:style-name="T1"> </text:span><text:span text:style-name="T2">(44/18) </text:span> ⲑⲉ̅ⲩ̅ⲇ̅ⲁ̅ ⲡⲓⲱⲧ’ ⲙ̅ⲡⲓⲇⲓⲕⲁⲓⲟⲥ <text:line-break/><text:span text:style-name="T1"> </text:span><text:span text:style-name="T2">(44/19) </text:span> ⲉⲡⲓⲇⲏ ⲛⲉⲩⲥⲩⲅ’ⲅⲉⲛⲏⲥ ⲛ̅‐ <text:line-break/><text:span text:style-name="T1"> </text:span><text:span text:style-name="T2">(44/20) </text:span> ⲧⲁϥ ⲡⲉ ⲉϥϫⲱ ⲙ̅ⲙⲟⲥ ϫⲉ <text:line-break/><text:span text:style-name="T1"> </text:span><text:span text:style-name="T2">(44/21) </text:span> [ϭⲉⲡ]ⲏ ⲙ̅ⲙⲟⲕ ⲁⲙⲟⲩ ⲙⲛ̅ <text:line-break/><text:span text:style-name="T1"> </text:span><text:span text:style-name="T2">(44/22) </text:span> [ⲙⲁⲣ]ⲓ̣ⲁ̣ ⲧ̣ⲉⲕⲥ{ϩ̅ⲓ}ⲙⲉ ⲙⲛ̅ ⲛⲓ‐ <text:line-break/><text:span text:style-name="T1"> </text:span><text:span text:style-name="T2">(44/23) </text:span> [ⲥⲩⲅ’]ⲅ̣ⲉ[ⲛ]ⲏⲥ ⲛ̅ⲧ̣ⲁⲕ ⲛ̣̅ⲛ̣ⲉϥ <text:line-break/><text:span text:style-name="T1"> </text:span><text:span text:style-name="T2">(44/24) </text:span> [ 8+- ].[ 6+-]ⲡ̣ⲟ̣[ <text:line-break/><text:span text:style-name="T1"> </text:span><text:span text:style-name="T2">(44/25) </text:span> (6+- lines lacking) <text:line-break/><text:span text:style-name="T1"> </text:span><text:span text:style-name="T2">(45/1) </text:span> [.]ϣⲁ ϭⲉ ⲛ̅[ <text:line-break/><text:span text:style-name="T1"> </text:span><text:span text:style-name="T2">(45/2) </text:span> ⲁ̣ⲩⲱ ϫⲉ .[ <text:line-break/><text:span text:style-name="T1"> </text:span><text:span text:style-name="T2">(45/3) </text:span> ⲛⲉ ⲛⲉ.[ <text:line-break/><text:span text:style-name="T1"> </text:span><text:span text:style-name="T2">(45/4) </text:span> ⲙ̅ⲡⲉⲧ[ <text:line-break/><text:span text:style-name="T1"> </text:span><text:span text:style-name="T2">(45/5) </text:span> ⲙ̅ⲡⲉⲓ̈.[ 6+-]ⲁ̣ⲛ[..].[ <text:line-break/><text:span text:style-name="T1"> </text:span><text:span text:style-name="T2">(45/6) </text:span> ⲉⲣⲟϥ· ϭ̣ⲉ̣ⲡ̣ⲏ ϭⲉ̣ [ⲙ]ⲉϣⲁⲕ [ⲛ̅]‐ <text:line-break/><text:span text:style-name="T1"> </text:span><text:span text:style-name="T2">(45/7) </text:span> ⲧⲟⲕ ϩⲱⲱⲕ̣ [ⲉⲧⲁⲕ]ϫ̣ⲓ̣ ⲙⲟⲉ[ⲓ]ⲧ̣ <text:line-break/><text:span text:style-name="T1"> </text:span><text:span text:style-name="T2">(45/8) </text:span> ⲛⲁⲛ ϣⲁⲣⲟ̣ϥ̣ [ϥⲛⲁⲣ̅]ⲛⲟⲉⲓ· <text:line-break/><text:span text:style-name="T1"> </text:span><text:span text:style-name="T2">(45/9) </text:span> ⲉⲓⲥ ϩⲏⲏⲧⲉ ⲅⲁⲣ [ⲟⲩ]ⲛ̣̅ ⲟⲩⲙⲏ‐ <text:line-break/><text:span text:style-name="T1"> </text:span><text:span text:style-name="T2">(45/10) </text:span> ⲏϣⲉ ⲉⲩϣⲧⲣ̅ⲧⲱⲣ ⲉϫⲙ̅ <text:line-break/><text:span text:style-name="T1"> </text:span><text:span text:style-name="T2">(45/11) </text:span> ⲡ̣ⲉ̣ϥ̣[..ⲁ]ⲩⲱ ⲥⲉϭⲁⲛⲧ̅’ <text:line-break/><text:span text:style-name="T1"> </text:span><text:span text:style-name="T2">(45/12) </text:span> [ⲉⲣⲟϥ ϩⲛ̅ ⲟ]ⲩⲛⲟϭ ⲛ̅ϭⲱⲛⲧ̅’· <text:line-break/><text:span text:style-name="T1"> </text:span><text:span text:style-name="T2">(45/13) </text:span> [ 7+- ]. ⲇ̣ⲉ̣ ⲥⲉ̣[ϣ]ⲗⲏⲗ <text:line-break/><text:span text:style-name="T1"> </text:span><text:span text:style-name="T2">(45/14) </text:span> [ 13+- ]ⲟⲩ <text:line-break/><text:span text:style-name="T1"> </text:span><text:span text:style-name="T2">(45/15) </text:span> [ 6+-]. ⲛⲉⲓ̣̈ϣ[ⲁ]ϫⲉ ⲅⲁⲣ <text:line-break/><text:span text:style-name="T1"> </text:span><text:span text:style-name="T2">(45/16) </text:span> [ⲛⲉϥ]ϣ̣[ⲁϫ]ⲉ̣ ⲙ̅ⲙⲟⲟⲩ ⲛ̅ⲟⲩ‐ <text:line-break/><text:span text:style-name="T1"> </text:span><text:span text:style-name="T2">(45/17) </text:span> [ⲙⲏⲏ]ϣⲉ̣ ⲛ̣̅ⲥⲟⲡ ⲙⲛ̅ ϩⲉⲛⲕⲟ‐ <text:line-break/><text:span text:style-name="T1"> </text:span><text:span text:style-name="T2">(45/18) </text:span> ⲟ̣ⲩ̣ⲉ̣ ⲟⲛ ⲛⲉⲓ̈ϣⲁϫⲉ ⲛⲉϥϫⲱ <text:line-break/><text:span text:style-name="T1"> </text:span><text:span text:style-name="T2">(45/19) </text:span> ⲙ̅ⲙⲟⲟⲩ ⲉⲩϩⲙⲟⲟⲥ ⲛ̅ϭⲓ <text:line-break/><text:span text:style-name="T1"> </text:span><text:span text:style-name="T2">(45/20) </text:span> ⲡⲁϣⲁⲓ̈ ⲛ̅ⲛ̅ⲗⲁⲟⲥ· ⲁϥ{ⲉ̅ⲓ} ⲉ‐ <text:line-break/><text:span text:style-name="T1"> </text:span><text:span text:style-name="T2">(45/21) </text:span> ϩⲟⲩⲛ ⲛ̅ⲧⲟϥ ⲁϥϩⲙⲟⲟⲥ ϩ̣ⲣ̣[ⲁⲓ̈] <text:line-break/><text:span text:style-name="T1"> </text:span><text:span text:style-name="T2">(45/22) </text:span> ϩⲙ̅ ⲡⲓⲙⲁ 〈ⲁⲛ〉 ⲉⲡⲉϥⲥⲱⲛⲧ̅’ [ⲡⲉ] <text:line-break/><text:span text:style-name="T1"> </text:span><text:span text:style-name="T2">(45/23) </text:span> ⲁⲗⲗⲁ ⲁϥϩⲙⲟⲟⲥ ⲛ̅ⲥⲁⲧ̣[ⲡⲉ] <text:line-break/><text:span text:style-name="T1"> </text:span><text:span text:style-name="T2">(45/24) </text:span> ⲙ̅ⲡⲙⲁϩϯⲟⲩ ⲛ̅ⲧⲱⲣⲧ̅’ [ⲡⲉⲧ]‐ <text:line-break/><text:span text:style-name="T1"> </text:span><text:span text:style-name="T2">(45/25) </text:span> ⲧⲁⲓ̈ⲏⲟⲩⲧ’· ⲉⲣⲉⲡ̣ⲉⲛ̣[ⲗⲁ]‐ <text:line-break/><text:span text:style-name="T1"> </text:span><text:span text:style-name="T2">(45/26) </text:span> ⲟⲥ ⲧⲏⲣ̣ϥ̣̅ .[ <text:line-break/><text:span text:style-name="T1"> </text:span><text:span text:style-name="T2">(45/27) </text:span> ⲉⲛϣ[ⲁ]ϫⲉ̣[ <text:line-break/><text:span text:style-name="T1"> </text:span><text:span text:style-name="T2">(45/28) </text:span> ⲧⲉ̣..[ <text:line-break/><text:span text:style-name="T1"> </text:span><text:span text:style-name="T2">(45/29) </text:span> [...]ϣ̣.[ <text:line-break/><text:span text:style-name="T1"> </text:span><text:span text:style-name="T2">(45/30) </text:span> [...]ⲱ̣[ <text:line-break/><text:span text:style-name="T1"> </text:span><text:span text:style-name="T2">(46/1) </text:span> [ 13+- ]ⲡⲉ ⲡⲣⲱ <text:line-break/><text:span text:style-name="T1"> </text:span><text:span text:style-name="T2">(46/2) </text:span> [ 13+- ]ⲉ̣ⲃⲟⲗ ⲛ̅ <text:line-break/><text:soft-page-break/><text:span text:style-name="T1"> </text:span><text:span text:style-name="T2">(46/3) </text:span> [ 15+- ]ⲩϣⲁ <text:line-break/><text:span text:style-name="T1"> </text:span><text:span text:style-name="T2">(46/4) </text:span> [ 15+- ]ⲙ̅ⲡⲏ <text:line-break/><text:span text:style-name="T1"> </text:span><text:span text:style-name="T2">(46/5) </text:span> [ 14+- ]ϫⲉ ⲟⲩ <text:line-break/><text:span text:style-name="T1"> </text:span><text:span text:style-name="T2">(46/6) </text:span> [..]..[.]ⲉ· ⲁ̣[ⲛ]ⲟⲕ ⲡ̣[ⲉ ⲡ]ⲏ ⲉⲧⲁⲩ̣ <text:line-break/><text:span text:style-name="T1"> </text:span><text:span text:style-name="T2">(46/7) </text:span> [ϭ]ⲱ̣ⲗⲡ̅’ ⲛ[ⲁϥ ⲉⲃ]ⲟ̣ⲗ̣̓ ⲉⲃⲟⲗ {ϩ̅ⲓ}ⲧⲛ̅ <text:line-break/><text:span text:style-name="T1"> </text:span><text:span text:style-name="T2">(46/8) </text:span> ⲡ̣̅ⲡ̣ⲗⲏⲣⲱ[ⲙⲁ ⲛ̅ⲧⲉ] ϯⲁⲫⲑⲁⲣ‐ <text:line-break/><text:span text:style-name="T1"> </text:span><text:span text:style-name="T2">(46/9) </text:span> ⲥⲓⲁ· ⲡⲉⲛ[ⲧⲁⲩ]ⲣ̣̅ ϣⲟⲣⲡ̅’ ⲛ̅ⲧⲁϩ‐ <text:line-break/><text:span text:style-name="T1"> </text:span><text:span text:style-name="T2">(46/10) </text:span> ⲙⲉϥ ϩⲙ̅ ⲡⲏ ⲉⲧⲛⲉⲁϥ· ⲁⲩⲱ <text:line-break/><text:span text:style-name="T1"> </text:span><text:span text:style-name="T2">(46/11) </text:span> ⲁϥⲥⲱⲧⲙ̅ ⲛ̅ⲥⲁ ⲡϫ̣[ⲟⲉⲓⲥ] <text:line-break/><text:span text:style-name="T1"> </text:span><text:span text:style-name="T2">(46/12) </text:span> ⲡⲉⲛⲧⲁϥⲟⲩⲱⲧ̣ⲃ̣̅ [ⲉⲃⲟⲗ ⲛ̅]‐ <text:line-break/><text:span text:style-name="T1"> </text:span><text:span text:style-name="T2">(46/13) </text:span> ⲛ̅ⲕⲟⲥ̣[ⲙⲟⲥ <text:line-break/><text:span text:style-name="T1"> </text:span><text:span text:style-name="T2">(46/14) </text:span> ⲡⲏ ⲉ[ⲧ....]ⲁ̣ϥ̣[..ⲡⲉⲛⲧⲁϥ]‐ <text:line-break/><text:span text:style-name="T1"> </text:span><text:span text:style-name="T2">(46/15) </text:span> ⲕⲁⲕϥ̅ ⲁϩⲏⲟⲩ· ⲟ[ⲩⲁⲁ]ϥ̣ [ⲁⲩⲱ] <text:line-break/><text:span text:style-name="T1"> </text:span><text:span text:style-name="T2">(46/16) </text:span> ⲁϥⲙⲟⲟϣⲉ ⲉϥⲕⲏⲕ ⲁϩ[ⲏⲟⲩ] <text:line-break/><text:span text:style-name="T1"> </text:span><text:span text:style-name="T2">(46/17) </text:span> ⲡⲉⲛⲧⲁⲩϭⲛ̅ⲧϥ̅ ϩⲛ̅ⲛ ⲟⲩ‐ <text:line-break/><text:span text:style-name="T1"> </text:span><text:span text:style-name="T2">(46/18) </text:span> ⲧⲁⲕⲟ· ⲉⲩⲛⲁⲟⲩⲁⲧⲃⲉϥ <text:line-break/><text:span text:style-name="T1"> </text:span><text:span text:style-name="T2">(46/19) </text:span> [ⲉ]ϩⲣⲁⲓ̈ ⲉϯⲁⲫⲑⲁⲣⲥⲓⲁ· <text:line-break/><text:span text:style-name="T1"> </text:span><text:span text:style-name="T2">(46/20) </text:span> [ⲡⲉ]ⲓ̈ϫⲟⲉⲓⲥ ⲉⲧⲙ̅ⲡⲉⲓ̈ⲙⲁ· <text:line-break/><text:span text:style-name="T1"> </text:span><text:span text:style-name="T2">(46/21) </text:span> [ⲁϥ{ⲉ̅ⲓ}] ⲉⲩϣⲏⲣⲉ ⲡⲉ ⲉϥⲛⲁⲩ <text:line-break/><text:span text:style-name="T1"> </text:span><text:span text:style-name="T2">(46/22) </text:span> [ⲉⲃ]ⲟ̣ⲗ̓ ⲁⲩⲱ ⲉⲩⲥⲟⲛ ⲡⲉ <text:line-break/><text:span text:style-name="T1"> </text:span><text:span text:style-name="T2">(46/23) </text:span> [ⲁⲩ]ϣ̣ⲛ̣̅ⲧϥ̅ ⲉϥⲛ̅ⲛⲏⲟⲩ ϣⲁ <text:line-break/><text:span text:style-name="T1"> </text:span><text:span text:style-name="T2">(46/24) </text:span> [.....].ⲉ̣[..].[.]ϫ̣ⲡⲟϥ ϫⲉ <text:line-break/><text:span text:style-name="T1"> </text:span><text:span text:style-name="T2">(46/25) </text:span> [ 10+- ]ⲁⲩⲱ ϥⲧⲱⲧ’ <text:line-break/><text:span text:style-name="T1"> </text:span><text:span text:style-name="T2">(46/26) </text:span> [ 10+- ]ⲁ̣[ⲁ]ϥ̣ ⲛ̅ⲣ̣ⲙ̣̅ϩ̣ⲉ̣ <text:line-break/><text:span text:style-name="T1"> </text:span><text:span text:style-name="T2">(46/27) </text:span> [ 14+- ].ⲟⲩ[ <text:line-break/><text:span text:style-name="T1"> </text:span><text:span text:style-name="T2">(46/28) </text:span> (13+- lines lacking) <text:line-break/><text:span text:style-name="T1"> </text:span><text:span text:style-name="T2">(47/1) </text:span> ϩ̣ⲛ̣̅.[.].ⲉ̣[ 9+- ⲡⲉⲛ]‐ <text:line-break/><text:span text:style-name="T1"> </text:span><text:span text:style-name="T2">(47/2) </text:span> ⲧⲁϥⲉⲓ ϣ̣[ⲁⲣⲟ <text:line-break/><text:span text:style-name="T1"> </text:span><text:span text:style-name="T2">(47/3) </text:span> ⲧⲓⲥ· ⲁ̣[ <text:line-break/><text:span text:style-name="T1"> </text:span><text:span text:style-name="T2">(47/4) </text:span> ⲡⲓⲕ[ <text:line-break/><text:span text:style-name="T1"> </text:span><text:span text:style-name="T2">(47/5) </text:span> ϩⲛ̅ ⲟ[ⲩ <text:line-break/><text:span text:style-name="T1"> </text:span><text:span text:style-name="T2">(47/6) </text:span> ⲉⲓ̈ⲉ[....]ⲁ̣.[.]ⲧ̣ⲕ[..]ⲁ̣[ <text:line-break/><text:span text:style-name="T1"> </text:span><text:span text:style-name="T2">(47/7) </text:span> ϯⲛⲟⲩ ⲟⲛ ϯⲉ ⲛ̣̅[ⲣⲙ̅]ⲙⲁⲟ ϩⲛ̣̅ <text:line-break/><text:span text:style-name="T1"> </text:span><text:span text:style-name="T2">(47/8) </text:span> ⲟⲩⲅⲛⲱ[ⲥⲓⲥ ⲁⲩ]ⲱ ⲉⲩ[ⲛ̅]‐ <text:line-break/><text:span text:style-name="T1"> </text:span><text:span text:style-name="T2">(47/9) </text:span> ⲧⲁⲓ̈ ⲛ̅ⲛⲟⲩⲉ̣[ⲓⲙⲉ ⲛ̅]ⲟⲩⲱⲧ’ <text:line-break/><text:span text:style-name="T1"> </text:span><text:span text:style-name="T2">(47/10) </text:span> ⲡⲉⲛⲧⲁⲩϫⲡⲟϥ̣ ⲉⲃⲟⲗ ⲛ̅ⲥⲁ <text:line-break/><text:span text:style-name="T1"> </text:span><text:span text:style-name="T2">(47/11) </text:span> ⲡϣⲱ̣ⲉⲓ ⲟ̣ⲩⲁⲁϥ· ⲙⲛ̅ ⲡⲓϣⲟ <text:line-break/><text:span text:style-name="T1"> </text:span><text:span text:style-name="T2">(47/12) </text:span> [ 6+-]{ⲉ̣̅̅[̅ⲓ}] ⲉⲃⲟⲗ ϩⲛ̅ ⲟⲩⲙⲉ <text:line-break/><text:span text:style-name="T1"> </text:span><text:span text:style-name="T2">(47/13) </text:span> [ 6+-]ⲏⲧ’· ⲁⲛⲟⲕ ⲡⲉ ⲡⲓ <text:line-break/><text:span text:style-name="T1"> </text:span><text:span text:style-name="T2">(47/14) </text:span> [ 10+- ].[.]ⲛ̣̅ⲛⲟⲩ <text:line-break/><text:span text:style-name="T1"> </text:span><text:span text:style-name="T2">(47/15) </text:span> .[ 7+- ]ϣ̣[.].[.].ⲧ’ ⲉⲧⲁⲓ̈‐ <text:line-break/><text:span text:style-name="T1"> </text:span><text:span text:style-name="T2">(47/16) </text:span> ⲥ̣ⲟ̣ⲩ̣[ⲱⲛϥ̅]· ⲡⲉⲧⲁϥ̣ⲟⲩⲱⲛϩ̅ <text:line-break/><text:span text:style-name="T1"> </text:span><text:span text:style-name="T2">(47/17) </text:span> ⲛⲁⲓ̈ ⲁϥ̣[ϩ]ⲱⲡ’ ⲛ̅ⲥⲁⲃⲟⲗ ⲛ̅ⲟⲩ‐ <text:line-break/><text:span text:style-name="T1"> </text:span><text:span text:style-name="T2">(47/18) </text:span> ⲟⲛ̣ ⲛⲓⲙ· ⲁⲩⲱ ⲉϥⲉⲟⲩⲱⲛϩ̅ <text:line-break/><text:span text:style-name="T1"> </text:span><text:span text:style-name="T2">(47/19) </text:span> ⲉⲃⲟⲗ̓ ⲉⲃⲟⲗ {ϩ̅ⲓ}ⲧⲟⲟⲧϥ̅· ⲡⲓ‐ <text:line-break/><text:span text:style-name="T1"> </text:span><text:span text:style-name="T2">(47/20) </text:span> ⲥⲛⲁⲩ ⲉⲧⲛⲁⲩ ⲉⲃⲟⲗ̓ ⲁⲛ̣ⲟ̣ⲕ̣ <text:line-break/><text:span text:style-name="T1"> </text:span><text:span text:style-name="T2">(47/21) </text:span> ⲁⲩⲣ̅ ϣⲟⲣⲡ̅’ ⲛ̅ⲧⲁϣⲉⲟ̣[ⲉⲓϣ] <text:line-break/><text:soft-page-break/><text:span text:style-name="T1"> </text:span><text:span text:style-name="T2">(47/22) </text:span> ⲉⲃⲟⲗ {ϩ̅ⲓ}ⲧⲟⲟⲧⲟⲩ ⲛ̅ⲛⲓϣ̣[ⲁϫⲉ] <text:line-break/><text:span text:style-name="T1"> </text:span><text:span text:style-name="T2">(47/23) </text:span> ⲉⲩⲉϯ ϩⲁⲡ’ ⲉⲣⲟϥ ⲙⲛ̅ [ⲛ̅ⲁⲇⲓ]‐ <text:line-break/><text:span text:style-name="T1"> </text:span><text:span text:style-name="T2">(47/24) </text:span> ⲕⲟⲥ· ⲡⲉⲛⲧⲁϥⲱⲛϩ̅ ⲭ̣[ⲱⲣⲓⲥ] <text:line-break/><text:span text:style-name="T1"> </text:span><text:span text:style-name="T2">(47/25) </text:span> ⲟⲩⲁ· ⲁϥⲙⲟⲩ ϩⲛ̅ⲛ ⲟⲩ̣[ⲁ] <text:line-break/><text:span text:style-name="T1"> </text:span><text:span text:style-name="T2">(47/26) </text:span> ⲡⲏ ⲉⲧ̣ⲁ̣[ⲩ]ⲛ[ⲟ]ϫ̣ϥ̣̅ [ⲉⲃ]ⲟⲗ <text:line-break/><text:span text:style-name="T1"> </text:span><text:span text:style-name="T2">(47/27) </text:span> ⲥⲉ.̅[ <text:line-break/><text:span text:style-name="T1"> </text:span><text:span text:style-name="T2">(47/28) </text:span> ⲉⲛ̣[ <text:line-break/><text:span text:style-name="T1"> </text:span><text:span text:style-name="T2">(47/29) </text:span> (2+- lines lacking) <text:line-break/><text:span text:style-name="T1"> </text:span><text:span text:style-name="T2">(48/1) </text:span> [ 12+- ]ⲧⲁϥϣⲁ <text:line-break/><text:span text:style-name="T1"> </text:span><text:span text:style-name="T2">(48/2) </text:span> [ 13+- ]ⲛ̅ⲃⲁⲗ <text:line-break/><text:span text:style-name="T1"> </text:span><text:span text:style-name="T2">(48/3) </text:span> [ 15+- ]{ⲉ̅ⲓ} <text:line-break/><text:span text:style-name="T1"> </text:span><text:span text:style-name="T2">(48/4) </text:span> [ 15+- ]ⲉⲓ̈ <text:line-break/><text:span text:style-name="T1"> </text:span><text:span text:style-name="T2">(48/5) </text:span> [.....]..[..].[...ⲧ]ⲥⲁⲣⲝ̅ <text:line-break/><text:span text:style-name="T1"> </text:span><text:span text:style-name="T2">(48/6) </text:span> [ⲁⲩ]ⲱ̣ ⲉ̣ⲉⲓⲛ̅[ⲛ]ⲏ̣ⲟⲩ ⲉⲃⲟⲗ ϩⲛ̅ <text:line-break/><text:span text:style-name="T1"> </text:span><text:span text:style-name="T2">(48/7) </text:span> ⲧ[ⲥⲁ]ⲣ̣ⲁⲝ ϩ[ⲛ̅ⲛ ⲟⲩⲅ]ⲛ̣ⲱⲥⲓⲥ· <text:line-break/><text:span text:style-name="T1"> </text:span><text:span text:style-name="T2">(48/8) </text:span> ⲁⲛ̣ⲟⲕ ⲉⲧⲙ̣[ⲟⲩ] ϩ̣ⲛ̅ⲛ ⲟⲩⲙⲟⲩ· <text:line-break/><text:span text:style-name="T1"> </text:span><text:span text:style-name="T2">(48/9) </text:span> ⲉⲩⲛⲁϭⲓⲛ[ⲉ] ⲇⲉ ⲙ̅ⲙⲟⲉⲓ ϩⲛ̅ <text:line-break/><text:span text:style-name="T1"> </text:span><text:span text:style-name="T2">(48/10) </text:span> ⲟⲩⲱⲛϩ̅· ⲁⲛⲟⲕ ⲁ̣ⲓ̈{ⲉ̅[̅ⲓ}] ⲉ̣ϩⲟⲩⲛ <text:line-break/><text:span text:style-name="T1"> </text:span><text:span text:style-name="T2">(48/11) </text:span> ϫⲉ ⲉⲩⲛⲁϯ ϩⲁ[ⲡ 6+-ϯ]‐ <text:line-break/><text:span text:style-name="T1"> </text:span><text:span text:style-name="T2">(48/12) </text:span> ⲛ̅ⲛⲏⲟⲩ ⲉⲃⲟⲗ ϩ̣[ⲛ̅ <text:line-break/><text:span text:style-name="T1"> </text:span><text:span text:style-name="T2">(48/13) </text:span> ⲛ̅ϯ ϩⲁⲡ̣ ⲁ̣[ 7+- ϯϯⲧ]ⲱ‐ <text:line-break/><text:span text:style-name="T1"> </text:span><text:span text:style-name="T2">(48/14) </text:span> ⲗ̣ⲙ̅ ⲁⲛ ⲉ̣ϩⲣⲁⲓ̈ ⲉϫⲱ̣[ⲟⲩ ⲛ̅]ⲛ̅‐ <text:line-break/><text:span text:style-name="T1"> </text:span><text:span text:style-name="T2">(48/15) </text:span> ϩⲙ̅ϩⲁⲗ ⲛ̅ⲧⲉ ⲡⲉϥⲉ̣[..]. ⲁ̣‐ <text:line-break/><text:span text:style-name="T1"> </text:span><text:span text:style-name="T2">(48/16) </text:span> ⲛⲁⲓ̈ ⲁⲛⲟⲕ ⲉϯϭⲉⲡⲏ ⲙ̅ⲙⲟⲓ̈ <text:line-break/><text:span text:style-name="T1"> </text:span><text:span text:style-name="T2">(48/17) </text:span> ⲉⲁⲁⲩ ⲛ̅ⲣⲙ̅ϩⲉ· ⲁⲩⲱ ⲉⲉⲓ‐ <text:line-break/><text:span text:style-name="T1"> </text:span><text:span text:style-name="T2">(48/18) </text:span> ⲟⲩⲱϣ ⲉϫⲓⲧⲟⲩ ⲛ̅ⲥⲁⲧⲡⲉ <text:line-break/><text:span text:style-name="T1"> </text:span><text:span text:style-name="T2">(48/19) </text:span> ⲙ̣̅ⲡⲏ ⲉⲧⲟⲩⲱϣ ⲉⲣ̅ ϫⲟⲉⲓⲥ <text:line-break/><text:span text:style-name="T1"> </text:span><text:span text:style-name="T2">(48/20) </text:span> [ⲉ]ϩ̣ⲣⲁⲓ̈ ⲉϫⲱⲟⲩ· ⲉϣⲱⲡⲉ <text:line-break/><text:span text:style-name="T1"> </text:span><text:span text:style-name="T2">(48/21) </text:span> [ⲉ]ⲩ̣ϣⲁⲛⲣ̅ⲃⲟⲏⲑⲓ ⲉⲣⲟⲟⲩ <text:line-break/><text:span text:style-name="T1"> </text:span><text:span text:style-name="T2">(48/22) </text:span> [ⲁ]ⲛⲟⲕ ⲡⲉ ⲡⲓⲥⲟⲛ ϩⲛ̅ⲛ ⲟⲩ‐ <text:line-break/><text:span text:style-name="T1"> </text:span><text:span text:style-name="T2">(48/23) </text:span> [ϩⲉ] ⲛ̅ϫⲓⲟ̣ⲩⲉ· ⲡⲉⲛⲧⲁϥⲣ̅ⲁⲣ‐ <text:line-break/><text:span text:style-name="T1"> </text:span><text:span text:style-name="T2">(48/24) </text:span> [ⲁ]ⲥ̣ⲑ[ⲉ] ⲙ̅ⲡ̣ⲉⲓ̈ⲱ̣ⲧ’̣ ϣⲁⲛ‐ <text:line-break/><text:span text:style-name="T1"> </text:span><text:span text:style-name="T2">(48/25) </text:span> [ⲧⲉϥ 7+- ]ϩⲛ̅ <text:line-break/><text:span text:style-name="T1"> </text:span><text:span text:style-name="T2">(48/26) </text:span> [ 14+- ]ⲱ̣ <text:line-break/><text:span text:style-name="T1"> </text:span><text:span text:style-name="T2">(48/27) </text:span> (14+- lines lacking) <text:line-break/><text:span text:style-name="T1"> </text:span><text:span text:style-name="T2">(49/1) </text:span> ⲙⲛ̅ⲛ ⲟⲩ[ <text:line-break/><text:span text:style-name="T1"> </text:span><text:span text:style-name="T2">(49/2) </text:span> ⲣ̣̅ ⲣ̅ⲣⲟ· ⲁ[ <text:line-break/><text:span text:style-name="T1"> </text:span><text:span text:style-name="T2">(49/3) </text:span> ϯⲁⲫ[ⲑⲁⲣⲥⲓⲁ....ϣⲟ]‐ <text:line-break/><text:span text:style-name="T1"> </text:span><text:span text:style-name="T2">(49/4) </text:span> ⲣⲡ̅’ ϩ[ⲛ̅ <text:line-break/><text:span text:style-name="T1"> </text:span><text:span text:style-name="T2">(49/5) </text:span> ⲁⲛⲟⲕ̣ [ⲡⲉ ⲡϣⲟ]ⲣⲡ̅ [ⲛ̅ϣⲏⲣⲉ] <text:line-break/><text:span text:style-name="T1"> </text:span><text:span text:style-name="T2">(49/6) </text:span> [ⲉ]ⲧⲁⲩϫⲡⲟϥ· ϥ̣[ⲛ]ⲁ̣ⲃⲱⲗ̣ <text:line-break/><text:span text:style-name="T1"> </text:span><text:span text:style-name="T2">(49/7) </text:span> ⲉⲃⲟⲗ ⲛ̅ⲧⲉ[ⲩⲙⲛ̅ⲧ]ϫ̣ⲟⲉⲓⲥ̣ [ⲧⲏ]‐ <text:line-break/><text:span text:style-name="T1"> </text:span><text:span text:style-name="T2">(49/8) </text:span> ⲣ̣ⲟⲩ· ⲁⲛⲟⲕ̣ [ⲡⲉ] ⲡ̣ⲓⲙⲉⲣⲓⲧ <text:line-break/><text:span text:style-name="T1"> </text:span><text:span text:style-name="T2">(49/9) </text:span> ⲁ̣ⲛⲟⲕ ⲡⲉ ⲡⲓⲇ[ⲓⲕ]ⲁⲓⲟⲥ· <text:line-break/><text:span text:style-name="T1"> </text:span><text:span text:style-name="T2">(49/10) </text:span> ⲁⲛⲟⲕ̣ ⲡⲉ ⲡⲓϣⲏⲣⲉ ⲛ̅ⲧⲉ <text:line-break/><text:span text:style-name="T1"> </text:span><text:span text:style-name="T2">(49/11) </text:span> [ⲡⲓⲉⲓⲱⲧ’] ϯϣⲁϫⲉ ⲛ̅ⲑⲉ <text:line-break/><text:span text:style-name="T1"> </text:span><text:span text:style-name="T2">(49/12) </text:span> [ⲉ]ⲧ̣ⲁ̣[ⲓ̈ⲥ]ⲱⲧⲙ̅· ϯϯ ⲁⲛⲥⲙ̅ⲙⲉ <text:line-break/><text:soft-page-break/><text:span text:style-name="T1"> </text:span><text:span text:style-name="T2">(49/13) </text:span> ⲛ̣̅ⲑⲉ [ⲉ]ⲧⲁⲓ̣̈[ϫⲓ] ⲛ̣̅ϯⲉⲛⲧⲟⲗⲏ ϯ‐ <text:line-break/><text:span text:style-name="T1"> </text:span><text:span text:style-name="T2">(49/14) </text:span> ⲧⲁⲙ[ⲟ] ⲙ̅ⲙ̣[ⲱ]ⲧ̣ⲛ̣̅· ⲛ̅ⲑⲉ ⲉⲛ‐ <text:line-break/><text:span text:style-name="T1"> </text:span><text:span text:style-name="T2">(49/15) </text:span> ⲧⲁⲓ̈ϭ̣[ⲓⲛ]ⲉ ⲉⲓⲥ ϩⲏⲏⲧⲉ ϯϣⲁϫⲉ <text:line-break/><text:span text:style-name="T1"> </text:span><text:span text:style-name="T2">(49/16) </text:span> ϫⲉⲕⲁⲁⲥ ⲉⲓ̈ⲛⲁⲉⲓ ⲉⲃⲟⲗ· ⲙⲁ‐ <text:line-break/><text:span text:style-name="T1"> </text:span><text:span text:style-name="T2">(49/17) </text:span> ϯ ϩⲧⲏⲧⲛ̅ ⲉⲣⲟⲉⲓ {ϩ̅ⲓ}ⲛⲁ ⲛ̅ⲧⲉ‐ <text:line-break/><text:span text:style-name="T1"> </text:span><text:span text:style-name="T2">(49/18) </text:span> ⲧⲛ̅ⲛⲁⲩ ⲉⲣⲟⲉⲓ· ⲉϣϫⲉ ⲁⲓ̈‐ <text:line-break/><text:span text:style-name="T1"> </text:span><text:span text:style-name="T2">(49/19) </text:span> ϣⲱⲡⲉ {ϩ̅ⲓ}ⲉ ⲁⲛⲟⲕ ⲛⲓⲙ· ⲉⲛⲧ̣‐ <text:line-break/><text:span text:style-name="T1"> </text:span><text:span text:style-name="T2">(49/20) </text:span> {ⲧ}ⲁⲓ̈{ⲉ̅ⲓ} ⲅⲁⲣ 〈ⲁⲛ〉 ⲛ̅ⲑⲉ ⲉⲧⲉ{ⲉⲓ}ⲉ ⲙ̣̅‐ <text:line-break/><text:span text:style-name="T1"> </text:span><text:span text:style-name="T2">(49/21) </text:span> ⲙⲟⲥ· ⲟⲩⲧⲉ ⲛ̅ⲛⲉⲓ̈ⲛⲁⲟ[ⲩ]‐ <text:line-break/><text:span text:style-name="T1"> </text:span><text:span text:style-name="T2">(49/22) </text:span> ⲱⲛϩ̅ ⲉⲃⲟⲗ ⲁⲛ ⲛ̅ⲑⲉ ⲉϯ[ϣⲟ]‐ <text:line-break/><text:span text:style-name="T1"> </text:span><text:span text:style-name="T2">(49/23) </text:span> ⲟⲡ’ ⲙ̅ⲙⲟⲥ· ⲛⲉⲓ̈ϣⲟⲟⲡ <text:line-break/><text:span text:style-name="T1"> </text:span><text:span text:style-name="T2">(49/24) </text:span> ⲅⲁⲣ ϩⲛ̅ⲛ ⲟⲩⲕⲟⲩ{ⲉ̅ⲓ} ⲛ̅ⲏⲡ̣[ⲉ] <text:line-break/><text:span text:style-name="T1"> </text:span><text:span text:style-name="T2">(49/25) </text:span> ⲛ̅ⲛⲟⲩⲟⲉⲓ̣ϣ̣ [...]ⲱⲛⲉ̣[ <text:line-break/><text:span text:style-name="T1"> </text:span><text:span text:style-name="T2">(49/26) </text:span> ⲙⲛ̅ ⲧⲁ̣[ 9+- ]ⲩ̣.[ <text:line-break/><text:span text:style-name="T1"> </text:span><text:span text:style-name="T2">(49/27) </text:span> ⲁⲩ[ <text:line-break/><text:span text:style-name="T1"> </text:span><text:span text:style-name="T2">(49/28) </text:span> ⲱ[ <text:line-break/><text:span text:style-name="T1"> </text:span><text:span text:style-name="T2">(49/29) </text:span> (2+- lines lacking) <text:line-break/><text:span text:style-name="T1"> </text:span><text:span text:style-name="T2">(50/1) </text:span> [ 11+- ]· ⲉⲡⲓⲇⲏ̣ <text:line-break/><text:span text:style-name="T1"> </text:span><text:span text:style-name="T2">(50/2) </text:span> [ 12+- ].· ⲁⲩⲱ <text:line-break/><text:span text:style-name="T1"> </text:span><text:span text:style-name="T2">(50/3) </text:span> [ 13+- ]ⲉⲟⲩ <text:line-break/><text:span text:style-name="T1"> </text:span><text:span text:style-name="T2">(50/4) </text:span> [.....].[ 8+- ]ⲱⲁ <text:line-break/><text:span text:style-name="T1"> </text:span><text:span text:style-name="T2">(50/5) </text:span> [..]. ⲉⲓ̈ϩⲙ̣[ⲟ]ⲟⲥ̣ ⲛ̅ⲛ̣[ⲟ]ⲩⲟ‐ <text:line-break/><text:span text:style-name="T1"> </text:span><text:span text:style-name="T2">(50/6) </text:span> [ⲉⲓ]ϣ· ⲉⲓ̈[ϣⲟ]ϫ̣ⲛ̣ⲉ ⲛ̅[ϩ]ⲏ̣ⲧ’· <text:line-break/><text:span text:style-name="T1"> </text:span><text:span text:style-name="T2">(50/7) </text:span> [ⲁϥ]ⲟⲩⲱ[ⲛ ⲙ̅ⲡ]ⲣ̣ⲟ ⲁ[ϥ]{ⲉ̅ⲓ} ⲛⲁⲓ̈ <text:line-break/><text:span text:style-name="T1"> </text:span><text:span text:style-name="T2">(50/8) </text:span> ⲉϩⲟⲩⲛ ⲛ̣̅[ϭ]ⲓ̣ ⲡ̣ⲁⲓ̈ ⲉⲧ̣ⲙ̅ⲙⲁⲩ <text:line-break/><text:span text:style-name="T1"> </text:span><text:span text:style-name="T2">(50/9) </text:span> ⲡⲉⲛⲧⲁⲧⲉⲧⲛ̅ⲙⲉ[ⲥ]ⲧ̣ⲱϥ <text:line-break/><text:span text:style-name="T1"> </text:span><text:span text:style-name="T2">(50/10) </text:span> ⲁⲩⲱ ⲁⲧⲉⲧⲛ̅ⲡⲱ̣[ⲧ ⲛ̅ⲥⲱϥ] <text:line-break/><text:span text:style-name="T1"> </text:span><text:span text:style-name="T2">(50/11) </text:span> ⲡⲉϫⲁϥ ⲛⲁⲓ̈ ϫⲉ ⲭⲁ̣[ⲓⲣ]ⲉ ⲡ[ⲁ]‐ <text:line-break/><text:span text:style-name="T1"> </text:span><text:span text:style-name="T2">(50/12) </text:span> ⲥⲟⲛ· ⲡⲁⲥⲟ̣[ⲛ] ⲭ̣ⲁⲓⲣ[ⲉ]· <text:line-break/><text:span text:style-name="T1"> </text:span><text:span text:style-name="T2">(50/13) </text:span> ⲛ̅ⲧⲉⲣⲓⲧⲱⲱⲛ̣ [ⲙ̅]ⲡⲁ̣[ϩ]ⲟ̣ ⲉϩⲣⲁⲓ̈ <text:line-break/><text:span text:style-name="T1"> </text:span><text:span text:style-name="T2">(50/14) </text:span> ϫⲉⲕⲁⲁⲥ ⲉⲓ̈ⲉⲉⲓⲱⲣ̣ⲙ̣̅ ⲛ̅ⲥⲱϥ· <text:line-break/><text:span text:style-name="T1"> </text:span><text:span text:style-name="T2">(50/15) </text:span> ⲡⲉϫⲉ ⲧⲙⲁⲁⲩ ⲛⲁⲓ̈ ϫⲉ ⲙ̅‐ <text:line-break/><text:span text:style-name="T1"> </text:span><text:span text:style-name="T2">(50/16) </text:span> ⲡⲣ̅ⲛⲟⲩϣⲡ̅’ ⲡⲁϣⲏⲣⲉ ϫⲉ <text:line-break/><text:span text:style-name="T1"> </text:span><text:span text:style-name="T2">(50/17) </text:span> ⲁϥϫⲟⲟⲥ ⲉⲣⲟⲕ ϫⲉ ⲡⲁⲥⲟⲛ· <text:line-break/><text:span text:style-name="T1"> </text:span><text:span text:style-name="T2">(50/18) </text:span> ⲁⲩⲥⲁⲛϣ̅ ⲧⲏⲩⲧⲛ̅ ⲅⲁⲣ ϩⲛ̅ <text:line-break/><text:span text:style-name="T1"> </text:span><text:span text:style-name="T2">(50/19) </text:span> [ⲧ]ⲉⲓ̈ⲉⲣⲱⲧⲉ ⲛ̅ⲟⲩⲱⲧ’· ⲉ‐ <text:line-break/><text:span text:style-name="T1"> </text:span><text:span text:style-name="T2">(50/20) </text:span> [ⲧ]ⲃ̣ⲉ ⲡⲁⲓ̈ ϣⲁϥⲙⲟⲩⲧⲉ <text:line-break/><text:span text:style-name="T1"> </text:span><text:span text:style-name="T2">(50/21) </text:span> ⲉ̣ⲣⲟⲓ̈ ϫⲉ ⲧⲁⲙⲁⲁⲩ· ⲛ̅ⲛⲟⲩ‐ <text:line-break/><text:span text:style-name="T1"> </text:span><text:span text:style-name="T2">(50/22) </text:span> ϣⲙ̅ⲙⲟ ⲅⲁⲣ ⲙ̅ⲙⲟⲛ ⲁⲛ ⲡⲉ· <text:line-break/><text:span text:style-name="T1"> </text:span><text:span text:style-name="T2">(50/23) </text:span> ⲡⲥⲟⲛ̣ [ϩⲁ] ⲡ̣ⲉⲕⲉⲓⲱⲧ’ ⲡⲉ· <text:line-break/><text:span text:style-name="T1"> </text:span><text:span text:style-name="T2">(50/24) </text:span> ⲛ̣̅ⲁ[ 10+- ]ⲉ̣ⲧⲛ̅ <text:line-break/><text:span text:style-name="T1"> </text:span><text:span text:style-name="T2">(50/25) </text:span> [ 13+- ]ⲁ̣ⲣⲉⲥ <text:line-break/><text:span text:style-name="T1"> </text:span><text:span text:style-name="T2">(50/26) </text:span> [ 16+- ]. <text:line-break/><text:span text:style-name="T1"> </text:span><text:span text:style-name="T2">(50/27) </text:span> (4+- lines lacking) <text:line-break/><text:span text:style-name="T1"> </text:span><text:span text:style-name="T2">(51/1) </text:span> ⲛⲁⲩ̣ ϫⲉ ⲡⲁ̣[ 9+- <text:line-break/><text:span text:style-name="T1"> </text:span><text:span text:style-name="T2">(51/2) </text:span> [ⲛ]ⲉⲓ̈ϣⲁϫ̣[ⲉ 6+-]ⲁϥ[ <text:line-break/><text:span text:style-name="T1"> </text:span><text:span text:style-name="T2">(51/3) </text:span> ⲛ̅ϩⲏⲧ’ ⲁ̣[ 6+-]ⲱ̣ⲟ̣[ <text:line-break/><text:soft-page-break/><text:span text:style-name="T1"> </text:span><text:span text:style-name="T2">(51/4) </text:span> ⲙ̅ⲙⲟⲥ̣ ϫ̣ⲉ̣[.....]ⲉϩ.[ <text:line-break/><text:span text:style-name="T1"> </text:span><text:span text:style-name="T2">(51/5) </text:span> ⲛⲟϭ ⲙ̅ⲙ̣ⲉ̣[.].[..]...[ <text:line-break/><text:span text:style-name="T1"> </text:span><text:span text:style-name="T2">(51/6) </text:span> [ⲁ]ⲛⲟⲕ ⲉϯⲛⲁϭ[ⲛ̅ⲧ]ⲟⲩ ⲛ̅[ⲥⲉⲉⲓ] <text:line-break/><text:span text:style-name="T1"> </text:span><text:span text:style-name="T2">(51/7) </text:span> ⲉ̣ⲃⲟⲗ· ⲁⲛⲟⲕ̣ [ⲇⲉ ⲡ]ⲉ ⲡⲓ̣[ϣ]ⲙ̣̅‐ <text:line-break/><text:span text:style-name="T1"> </text:span><text:span text:style-name="T2">(51/8) </text:span> ⲙ̣ⲟ ⲁⲩⲱ ⲙⲛ̅[ⲧⲁ]ⲩ̣ ⲥⲟⲟⲩⲛ <text:line-break/><text:span text:style-name="T1"> </text:span><text:span text:style-name="T2">(51/9) </text:span> [ⲙ̅]ⲙⲟⲉⲓ ϩⲛ̅ ⲛⲉ[ⲩ]ⲙ̣ⲉⲉⲩⲉ <text:line-break/><text:span text:style-name="T1"> </text:span><text:span text:style-name="T2">(51/10) </text:span> ϫⲉ ⲥⲉ[ⲥ]ⲟⲟⲩⲛ ⲙ̅ⲙⲟⲉ̣ⲓ̣ ϩⲙ̅ <text:line-break/><text:span text:style-name="T1"> </text:span><text:span text:style-name="T2">(51/11) </text:span> [ⲡⲉⲓ̈]ⲧ̣ⲟ̣ⲡ̣[ⲟ]ⲥ̣· ⲁⲗⲗⲁ ⲛⲉⲡⲉ‐ <text:line-break/><text:span text:style-name="T1"> </text:span><text:span text:style-name="T2">(51/12) </text:span> [ⲧⲉ]ϣϣⲉ ⲇⲉ ⲡⲉ ⲛ̅ⲧⲉϩ̣ⲉⲛⲕⲟ‐ <text:line-break/><text:span text:style-name="T1"> </text:span><text:span text:style-name="T2">(51/13) </text:span> [ⲟ]ⲩⲉ ⲉⲓⲙⲉ ⲉ[ⲃ]ⲟ̣ⲗ̣ {ϩ̅ⲓ}ⲧⲟⲟⲧⲕ̅· <text:line-break/><text:span text:style-name="T1"> </text:span><text:span text:style-name="T2">(51/14) </text:span> 〈ⲡⲁⲓ̈〉 ⲡⲉϯϫⲱ ⲙ̅ⲙⲟⲥ ⲛⲁⲕ ϫⲉ <text:line-break/><text:span text:style-name="T1"> </text:span><text:span text:style-name="T2">(51/15) </text:span> ⲥⲱⲧⲙ̅ ⲁ̣ⲩⲱ ⲉⲓⲙⲉ· ⲟⲩⲛ̅ <text:line-break/><text:span text:style-name="T1"> </text:span><text:span text:style-name="T2">(51/16) </text:span> ⲟⲩⲙⲏⲏϣⲉ ⲅⲁⲣ ⲉⲩϣⲁⲛ‐ <text:line-break/><text:span text:style-name="T1"> </text:span><text:span text:style-name="T2">(51/17) </text:span> ⲥⲱⲧⲙ̅ ⲥⲉⲛⲁⲣ̅ ϭⲁⲃϩⲏⲧ’· <text:line-break/><text:span text:style-name="T1"> </text:span><text:span text:style-name="T2">(51/18) </text:span> ⲛ̅ⲧⲟⲕ ⲇⲉ ⲉⲓⲙⲉ ⲛ̅ⲑⲉ ⲉϯ‐ <text:line-break/><text:span text:style-name="T1"> </text:span><text:span text:style-name="T2">(51/19) </text:span> ⲛⲁϣ ϫⲟⲟⲥ ⲛⲁⲕ· ⲡⲉⲕⲉⲓⲱ[ⲧ’] <text:line-break/><text:span text:style-name="T1"> </text:span><text:span text:style-name="T2">(51/20) </text:span> ⲛ̅ⲡⲁⲓ̈ⲱⲧ’ ⲉⲛ ⲡⲉ· ⲁⲗⲗⲁ <text:line-break/><text:span text:style-name="T1"> </text:span><text:span text:style-name="T2">(51/21) </text:span> ⲡⲁⲓ̈ⲱⲧ’ ⲁϥϣⲱⲡⲉ ⲛⲁ[ⲕ] <text:line-break/><text:span text:style-name="T1"> </text:span><text:span text:style-name="T2">(51/22) </text:span> ⲛ̅ⲛⲟⲩⲉⲓⲱⲧ’· ⲧⲉⲓ̈ⲡⲁⲣ‐ <text:line-break/><text:span text:style-name="T1"> </text:span><text:span text:style-name="T2">(51/23) </text:span> ⲑⲉⲛⲟⲥ ⲉⲧⲉⲕⲥⲱⲧⲙ̅ ⲉⲧⲃ̣[ⲏ]‐ <text:line-break/><text:span text:style-name="T1"> </text:span><text:span text:style-name="T2">(51/24) </text:span> ⲏⲧⲥ̅· ⲧⲁⲓ̈ ⲧⲉ ⲑⲉ[..]. ⲕ ⲥⲉ̣[ <text:line-break/><text:span text:style-name="T1"> </text:span><text:span text:style-name="T2">(51/25) </text:span> ⲡⲉⲙⲧ.[ 8+- ⲉ]ⲃ̣ⲟ̣ⲗ̣[ <text:line-break/><text:span text:style-name="T1"> </text:span><text:span text:style-name="T2">(51/26) </text:span> ⲛ̅ⲧⲁⲣⲓ̣[ <text:line-break/><text:span text:style-name="T1"> </text:span><text:span text:style-name="T2">(51/27) </text:span> ϫⲉ ⲉ̣..[ 7+- ⲡⲁⲣ]‐ <text:line-break/><text:span text:style-name="T1"> </text:span><text:span text:style-name="T2">(51/28) </text:span> ⲑ̣ⲉⲛⲟ[ⲥ <text:line-break/><text:span text:style-name="T1"> </text:span><text:span text:style-name="T2">(51/29) </text:span> (2+- lines lacking) <text:line-break/><text:span text:style-name="T1"> </text:span><text:span text:style-name="T2">(52/1) </text:span> [ 9+- ⲛ̅]ϭ̣ⲓ ϯⲡⲁⲣ‐ <text:line-break/><text:span text:style-name="T1"> </text:span><text:span text:style-name="T2">(52/2) </text:span> [ⲑⲉⲛⲟ]ⲥ· ⲁ[....]ⲉ ϫ̣ⲉ ⲡⲱⲥ <text:line-break/><text:span text:style-name="T1"> </text:span><text:span text:style-name="T2">(52/3) </text:span> [....]ⲁ̣ⲭⲱ̣[...].ⲁ̣[.]ⲛⲁⲓ̈ ϫⲉ <text:line-break/><text:span text:style-name="T1"> </text:span><text:span text:style-name="T2">(52/4) </text:span> [....]ⲧⲏ[....ⲉ]ⲓ̣ⲙⲉ ⲡⲁ <text:line-break/><text:span text:style-name="T1"> </text:span><text:span text:style-name="T2">(52/5) </text:span> [....]ⲛ̅ϥ̣[..]ⲣ̣ⲉ ⲛ̅ⲑ̣ⲉ ⲁⲛ <text:line-break/><text:span text:style-name="T1"> </text:span><text:span text:style-name="T2">(52/6) </text:span> [...]ⲉϯ[...]ϣⲥ̅· ⲡⲁⲓ̈ ⲅⲁⲣ <text:line-break/><text:span text:style-name="T1"> </text:span><text:span text:style-name="T2">(52/7) </text:span> .[..].ⲣⲉ ϩⲣⲁ̣[..] ⲟⲩϩϥ̅ ⲉⲣⲟϥ <text:line-break/><text:span text:style-name="T1"> </text:span><text:span text:style-name="T2">(52/8) </text:span> ⲁⲩⲱ ⲡⲁ[ⲓ̈ ⲟ]ⲛ̣ ⲉⲧⲣ̅ ⲛⲟϥⲣⲉ <text:line-break/><text:span text:style-name="T1"> </text:span><text:span text:style-name="T2">(52/9) </text:span> ⲛⲁⲕ· ⲡⲉⲕⲉⲓⲱⲧ’ ⲉⲧⲉⲕ‐ <text:line-break/><text:span text:style-name="T1"> </text:span><text:span text:style-name="T2">(52/10) </text:span> ⲙⲉⲉⲩⲉ ⲉⲣⲟϥ ϫⲉ ⲟ̣[ⲩ]ⲣⲙ̅ⲙ̣ⲁ̣[ⲟ] <text:line-break/><text:span text:style-name="T1"> </text:span><text:span text:style-name="T2">(52/11) </text:span> ⲡⲉ· ⲉϥⲉϯ ⲛⲁⲕ ⲉⲣ̅ⲕⲗⲏⲣ̣[ⲟ]‐ <text:line-break/><text:span text:style-name="T1"> </text:span><text:span text:style-name="T2">(52/12) </text:span> ⲛⲟⲙⲓ ⲛ̅ⲛⲁⲓ̈ ⲧⲏⲣ̣ⲟⲩ· ⲉⲧⲕ̅‐ <text:line-break/><text:span text:style-name="T1"> </text:span><text:span text:style-name="T2">(52/13) </text:span> ⲛⲁⲩ ⲉⲣⲟⲟⲩ· ⲁⲛⲟⲕ ϯϯ <text:line-break/><text:span text:style-name="T1"> </text:span><text:span text:style-name="T2">(52/14) </text:span> ϣⲙ̅ⲛⲟⲩϥⲉ ⲛⲁⲕ ⲉϯ ⲛⲁⲕ <text:line-break/><text:span text:style-name="T1"> </text:span><text:span text:style-name="T2">(52/15) </text:span> ⲛ̅ⲛⲏ ⲉϯⲛⲁϫⲟⲟⲩ· ⲉϣⲱ‐ <text:line-break/><text:span text:style-name="T1"> </text:span><text:span text:style-name="T2">(52/16) </text:span> ⲡⲉ ⲉⲕϣⲁⲛⲥⲱⲧⲙ̅ ϯⲛⲟⲩ <text:line-break/><text:span text:style-name="T1"> </text:span><text:span text:style-name="T2">(52/17) </text:span> ϭⲉ ⲁⲩⲟⲩⲱⲛ ⲛ̅ⲛⲉⲕⲙⲁⲁϫⲉ <text:line-break/><text:span text:style-name="T1"> </text:span><text:span text:style-name="T2">(52/18) </text:span> ⲁ̣ⲩⲱ ⲉⲓⲙⲉ· ⲁⲩⲱ ⲙⲟⲟϣⲉ <text:line-break/><text:span text:style-name="T1"> </text:span><text:span text:style-name="T2">(52/19) </text:span> [ⲉ]ⲩⲥⲓⲛⲉ ⲉⲧⲃⲏⲏⲧⲕ ⲉⲩⲣ̅‐ <text:line-break/><text:span text:style-name="T1"> </text:span><text:span text:style-name="T2">(52/20) </text:span> [ⲉⲛ]ⲉⲣⲅⲓ ⲉⲣⲟⲟⲩ ⲉⲃⲟⲗ {ϩ̅ⲓ}‐ <text:line-break/><text:span text:style-name="T1"> </text:span><text:span text:style-name="T2">(52/21) </text:span> ⲧ̣ⲟⲟⲧϥ̅ ⲙ̅ⲡⲏ ⲉⲧⲉ ⲛ̅ⲛⲉⲟⲟⲩ <text:line-break/><text:soft-page-break/><text:span text:style-name="T1"> </text:span><text:span text:style-name="T2">(52/22) </text:span> ⲉⲩⲟⲩⲱϣ ⲇⲉ ⲉⲉⲓⲣⲉ ⲛ̅ⲛⲟⲩ‐ <text:line-break/><text:span text:style-name="T1"> </text:span><text:span text:style-name="T2">(52/23) </text:span> ϣⲧⲟⲣⲧ̣[ⲣ̅ ⲙ]ⲛ̅ⲛ̣ [ⲟⲩ]ⲁⲙⲁϩⲧⲉ <text:line-break/><text:span text:style-name="T1"> </text:span><text:span text:style-name="T2">(52/24) </text:span> [.]ⲉⲛ.[ 8+- ]. ⲁⲛⲉⲥ <text:line-break/><text:span text:style-name="T1"> </text:span><text:span text:style-name="T2">(52/25) </text:span> [ 13+- ⲁ]ⲗⲗⲁ <text:line-break/><text:span text:style-name="T1"> </text:span><text:span text:style-name="T2">(52/26) </text:span> [ 14+- ]ⲁⲩⲱ <text:line-break/><text:span text:style-name="T1"> </text:span><text:span text:style-name="T2">(52/27) </text:span> [ 15+- ]ⲉ̣[ <text:line-break/><text:span text:style-name="T1"> </text:span><text:span text:style-name="T2">(52/28) </text:span> (3+- lines lacking) <text:line-break/><text:span text:style-name="T1"> </text:span><text:span text:style-name="T2">(53/1) </text:span> [.]ⲉ ⲁϥ{ϩ̅ⲓ} ⲧⲟⲟⲧϥ̣̅ [ <text:line-break/><text:span text:style-name="T1"> </text:span><text:span text:style-name="T2">(53/2) </text:span> [ⲙ̅]ⲙⲟϥ ⲁⲛ· ⲟⲩⲧ̣[ⲉ ⲛ]ⲉⲧⲛ̣̅[ⲛⲏⲟⲩ] <text:line-break/><text:span text:style-name="T1"> </text:span><text:span text:style-name="T2">(53/3) </text:span> ⲉⲧⲁⲩⲧⲁⲟⲩⲟⲟ[ⲩ ⲉ]ⲃⲟⲗ [{ϩ̅ⲓ}ⲧⲟ]‐ <text:line-break/><text:span text:style-name="T1"> </text:span><text:span text:style-name="T2">(53/4) </text:span> ⲟ̣ⲧϥ̅ ϫⲉ ⲉⲩⲉⲉⲓⲣⲉ̣ ⲙ̣̅ⲡⲉ[ⲓ̈ⲥⲱⲛⲧ̅’] <text:line-break/><text:span text:style-name="T1"> </text:span><text:span text:style-name="T2">(53/5) </text:span> ⲉϥⲙ̅ⲡⲉⲓ̈ⲙⲁ· ⲙⲛ̅ⲛ̣ⲥ̣ⲁ ⲛ̣[ⲁⲓ̈] <text:line-break/><text:span text:style-name="T1"> </text:span><text:span text:style-name="T2">(53/6) </text:span> [ⲉϥ]ϣⲁⲛϫⲓ ϣⲓⲡⲉ ⲉϥⲉϣⲧ̣[ⲟⲣⲧⲣ̅] <text:line-break/><text:span text:style-name="T1"> </text:span><text:span text:style-name="T2">(53/7) </text:span> ϫ̣ⲉ ⲡⲉϥ{ϩ̅ⲓ}ⲥⲉ ⲉⲧⲟ̣ⲩⲏⲟⲩ [ⲉⲃⲟⲗ] <text:line-break/><text:span text:style-name="T1"> </text:span><text:span text:style-name="T2">(53/8) </text:span> ⲛ̅ⲛⲓⲁⲓⲱⲛ ⲟⲩⲗⲁ[ⲁ]ⲩ ⲡⲉ· ⲁⲩⲱ <text:line-break/><text:span text:style-name="T1"> </text:span><text:span text:style-name="T2">(53/9) </text:span> [ⲧ]ⲉϥⲕⲗⲏⲣⲟⲛⲟⲙⲓⲁ ⲉⲥⲉⲟⲩⲱ‐ <text:line-break/><text:span text:style-name="T1"> </text:span><text:span text:style-name="T2">(53/10) </text:span> ⲛϩ̅ ⲉⲃⲟⲗ ⲉⲩⲕⲟⲩⲉⲓ ⲧⲉ· ⲧⲏ <text:line-break/><text:span text:style-name="T1"> </text:span><text:span text:style-name="T2">(53/11) </text:span> ⲉ̣ⲧ̣ⲁ̣ϥ̣ϣⲟ̣ⲩϣⲟⲩ ⲙ̅ⲙⲟϥ ⲉϩⲣⲁⲓ̈ <text:line-break/><text:span text:style-name="T1"> </text:span><text:span text:style-name="T2">(53/12) </text:span> [ⲉϫ]ⲱⲥ ϫⲉ ⲟⲩⲛⲟϭ ⲧⲉ· ⲛⲉϥ‐ <text:line-break/><text:span text:style-name="T1"> </text:span><text:span text:style-name="T2">(53/13) </text:span> [ⲇ]ⲱ̣ⲣⲉⲁ ⲧⲉ ϩⲉⲛⲛⲁⲅⲁⲑⲟⲛ <text:line-break/><text:span text:style-name="T1"> </text:span><text:span text:style-name="T2">(53/14) </text:span> ⲁ̣ⲛ ⲛⲉ· ⲛⲉϥⲉ̣ⲣⲏⲧ’ ϩⲉⲛϣⲟ‐ <text:line-break/><text:span text:style-name="T1"> </text:span><text:span text:style-name="T2">(53/15) </text:span> ϫⲛⲉ ⲉⲩϩⲟⲟⲩ ⲛⲉ· ⲛ̅ⲧⲕ̅ ⲟⲩ‐ <text:line-break/><text:span text:style-name="T1"> </text:span><text:span text:style-name="T2">(53/16) </text:span> ⲉⲃⲟⲗ ⲅⲁⲣ ϩⲛ̅ ⲛⲉϥⲙⲛ̅ⲧ’ϣⲁⲛ <text:line-break/><text:span text:style-name="T1"> </text:span><text:span text:style-name="T2">(53/17) </text:span> ⲧⲙⲁϩⲧ̅’ ⲁⲛ· ⲁⲗⲗⲁ ⲉϥϫⲓ ⲛ̅‐ <text:line-break/><text:span text:style-name="T1"> </text:span><text:span text:style-name="T2">(53/18) </text:span> ϭⲟⲛⲥ̅ ⲉⲃⲟⲗ {ϩ̅ⲓ}ⲧⲟⲟⲧⲕ̅· ϥⲟⲩ <text:line-break/><text:span text:style-name="T1"> </text:span><text:span text:style-name="T2">(53/19) </text:span> ⲱϣ ⲉⲣ̅ ⲁⲇⲓⲕⲓⲁ̣ ⲛⲁⲛ· ⲁⲩⲱ <text:line-break/><text:span text:style-name="T1"> </text:span><text:span text:style-name="T2">(53/20) </text:span> ϥⲛⲁⲣ̅ ϫⲟⲉⲓⲥ ϩⲛ̅ ⲟⲩⲭⲣⲟⲛⲟⲥ̣ <text:line-break/><text:span text:style-name="T1"> </text:span><text:span text:style-name="T2">(53/21) </text:span> ⲉⲁⲩϯ ⲏⲡⲉ ⲉⲣⲟϥ ⲛⲁϥ· ⲁⲗ̣ⲗ̣[ⲁ] <text:line-break/><text:span text:style-name="T1"> </text:span><text:span text:style-name="T2">(53/22) </text:span> ⲉⲓⲙⲉ ⲁⲩⲱ ⲥⲟⲩⲱⲛ ⲡⲓⲱⲧ’̣ <text:line-break/><text:span text:style-name="T1"> </text:span><text:span text:style-name="T2">(53/23) </text:span> ⲉⲧⲉ ⲟⲩⲛ̅ⲧⲁϥ ⲛ̅ⲛⲓⲙⲛ̅ⲧ’ϣⲁⲛ‐ <text:line-break/><text:span text:style-name="T1"> </text:span><text:span text:style-name="T2">(53/24) </text:span> ⲧⲙⲁϩⲧ̅’· ⲡⲏ ⲉⲧⲉ ⲙ̅ⲡⲟⲩϯ ⲛⲁϥ̣ <text:line-break/><text:span text:style-name="T1"> </text:span><text:span text:style-name="T2">(53/25) </text:span> ⲛ̅ⲟⲩⲕⲗⲏⲣⲟⲛⲟ̣ⲙⲓⲁ ⲉⲙⲡⲟ[ⲩ]‐ <text:line-break/><text:span text:style-name="T1"> </text:span><text:span text:style-name="T2">(53/26) </text:span> ϯ ⲏⲡⲉ ⲉⲣⲟⲥ· ⲟⲩⲧ̣[ⲉ] ⲙ̅ⲙⲛ̣̅[ⲧⲁⲥ] <text:line-break/><text:span text:style-name="T1"> </text:span><text:span text:style-name="T2">(53/27) </text:span> ⲛ̅ⲛⲟⲩⲏⲡⲉ ⲛ̅ⲧ̣ⲉ ϩ̣ⲉⲛϩⲟⲟ[ⲩ] <text:line-break/><text:span text:style-name="T1"> </text:span><text:span text:style-name="T2">(53/28) </text:span> ⲁⲗⲗⲁ ⲉⲥϣⲟⲟⲡ [ⲙ̅ⲡϩⲟ]ⲟⲩ ⲛ̣̅‐ <text:line-break/><text:span text:style-name="T1"> </text:span><text:span text:style-name="T2">(53/29) </text:span> ϣⲁ ⲉⲛⲉϩ ⲙ̣ⲛ̅.[.....]. ⲛ[ <text:line-break/><text:span text:style-name="T1"> </text:span><text:span text:style-name="T2">(53/30) </text:span> ⲉⲥϣⲟⲟⲡ[.].ⲥ̣.ⲙ[....].̅[ <text:line-break/><text:span text:style-name="T1"> </text:span><text:span text:style-name="T2">(54/1) </text:span> [....ⲁⲓⲥ]ⲑⲁⲛⲉⲥⲑⲁⲓ ⲉⲣ[ <text:line-break/><text:span text:style-name="T1"> </text:span><text:span text:style-name="T2">(54/2) </text:span> [...]ⲁ̣ϥ· ⲁ[ⲩ]ⲱ̣ ⲁϥⲣ̅ⲭⲣⲁⲥⲑⲁⲓ <text:line-break/><text:span text:style-name="T1"> </text:span><text:span text:style-name="T2">(54/3) </text:span> [...] ⲕ̣ⲁⲓⲅ̣ⲁ̣ⲣ ⲛ̅ⲛⲟⲩⲉⲃⲟⲗ ⲙ̅‐ <text:line-break/><text:span text:style-name="T1"> </text:span><text:span text:style-name="T2">(54/4) </text:span> [ⲙⲟⲟ]ⲩ ⲁⲛ ⲡ̣ⲉ· ⲉⲧⲃⲉ ⲡⲁⲓ̈ ϣⲁϥ‐ <text:line-break/><text:span text:style-name="T1"> </text:span><text:span text:style-name="T2">(54/5) </text:span> [ϫⲓ ⲥⲱ]ϣ· ⲉ̣ⲧⲃⲉ ⲡⲁⲓ̈ ϥϣⲟⲩ̣‐ <text:line-break/><text:span text:style-name="T1"> </text:span><text:span text:style-name="T2">(54/6) </text:span> [ϣⲟ]ⲩ̣ ⲙ̅ⲙⲟϥ ϫⲉ ⲛ̅ⲛⲉⲩⲥⲟϩⲉ̣ <text:line-break/><text:span text:style-name="T1"> </text:span><text:span text:style-name="T2">(54/7) </text:span> [ⲙ̅ⲙ]ⲟ̣ϥ· ⲉⲧⲃⲉ ⲡⲁⲓ̈ ⲅⲁⲣ ϥⲟⲩⲟ‐ <text:line-break/><text:span text:style-name="T1"> </text:span><text:span text:style-name="T2">(54/8) </text:span> ⲧⲃ̅ ⲛ̅ⲛⲉⲧ’ⲥⲁⲡⲉⲥⲏⲧ’ ⲛ̅ⲛⲏ <text:line-break/><text:span text:style-name="T1"> </text:span><text:span text:style-name="T2">(54/9) </text:span> ⲉⲧⲁⲩϭⲱϣⲧ’ ⲉⲡⲉⲥⲏⲧ’ ⲉ‐ <text:line-break/><text:span text:style-name="T1"> </text:span><text:span text:style-name="T2">(54/10) </text:span> ϫⲱⲕ ⲛ̅ϩⲏⲧⲟⲩ ⲉⲧⲁϥⲣ̅ⲁ̣ⲓ̣‐ <text:line-break/><text:soft-page-break/><text:span text:style-name="T1"> </text:span><text:span text:style-name="T2">(54/11) </text:span> ⲭⲙⲁⲗⲱⲧⲓ ⲛ̅ⲛⲓⲉⲃⲟⲗ ϩⲙ̅ [ⲡⲓ]‐ <text:line-break/><text:span text:style-name="T1"> </text:span><text:span text:style-name="T2">(54/12) </text:span> ⲱⲧ’· ⲁϥⲁⲙⲁϩⲧⲉ ⲙ̅ⲙⲟⲟⲩ <text:line-break/><text:span text:style-name="T1"> </text:span><text:span text:style-name="T2">(54/13) </text:span> ⲁⲩⲱ ⲁϥⲧⲁⲙⲓⲟⲟⲩ ⲉⲩⲉⲓ‐ <text:line-break/><text:span text:style-name="T1"> </text:span><text:span text:style-name="T2">(54/14) </text:span> ⲛⲉ ⲙ̅ⲙⲟϥ· ⲛ̅ⲧⲟⲟⲩ ⲇⲉ ⲉⲩ‐ <text:line-break/><text:span text:style-name="T1"> </text:span><text:span text:style-name="T2">(54/15) </text:span> ϣⲟⲟⲡ’ ⲛⲙ̅ⲙⲁϥ· ⲁⲛⲟⲕ ⲁⲓ̈‐ <text:line-break/><text:span text:style-name="T1"> </text:span><text:span text:style-name="T2">(54/16) </text:span> ⲛⲁⲩ ⲉⲛⲉⲛⲧⲁⲩϣⲱⲡⲉ ϫⲛ̅ <text:line-break/><text:span text:style-name="T1"> </text:span><text:span text:style-name="T2">(54/17) </text:span> ⲙ̅ⲡϫⲓⲥⲉ· ⲁⲩⲱ ⲁⲉⲓϯ ⲙⲁⲉⲓⲛ <text:line-break/><text:span text:style-name="T1"> </text:span><text:span text:style-name="T2">(54/18) </text:span> ϫⲉ ⲡⲱⲥ ⲁⲩϣⲱⲡⲉ· ⲁⲩⲱ <text:line-break/><text:span text:style-name="T1"> </text:span><text:span text:style-name="T2">(54/19) </text:span> [ⲁ]ⲩϭⲓⲛⲉ ⲙ̅ⲡⲉⲩϣⲓⲛⲉ ⲉⲩ‐ <text:line-break/><text:span text:style-name="T1"> </text:span><text:span text:style-name="T2">(54/20) </text:span> ϣ̣ⲟⲟⲡ’ ϩⲛ̅ ⲕⲉⲥⲙⲟⲧ’· ⲁⲩⲱ <text:line-break/><text:span text:style-name="T1"> </text:span><text:span text:style-name="T2">(54/21) </text:span> [ⲁⲩ]ⲥⲟⲟⲩⲛ 〈ⲙ̅ⲙⲟⲓ̈〉 ϩⲛ̅ ⲛⲉϯⲥⲟⲟⲩⲛ <text:line-break/><text:span text:style-name="T1"> </text:span><text:span text:style-name="T2">(54/22) </text:span> ⲙ̅ⲙⲟⲟⲩ ⲛ̅ⲑⲉ ⲉϯϣⲟⲟⲡ’ <text:line-break/><text:span text:style-name="T1"> </text:span><text:span text:style-name="T2">(54/23) </text:span> ⲙ̅ⲙⲟⲥ ⲉⲓ̈ϭⲁϣⲧ̅’ ⲉⲃⲟⲗ· <text:line-break/><text:span text:style-name="T1"> </text:span><text:span text:style-name="T2">(54/24) </text:span> ϩ̣ⲁⲑ̣ⲏ̣ ⲙⲉⲛ ⲛ̅ⲛⲉⲛⲧⲁⲩ‐ <text:line-break/><text:span text:style-name="T1"> </text:span><text:span text:style-name="T2">(54/25) </text:span> [ϣ]ⲱ̣ⲡ̣ⲉ̣ ⲉⲩⲛⲉⲉⲓⲣⲉ ⲛ̅ⲟⲩ <text:line-break/><text:span text:style-name="T1"> </text:span><text:span text:style-name="T2">(54/26) </text:span> [..]ⲕ̣ ⲉⲃⲟⲗ· ⲉⲓ̈ⲥ̣ⲟⲟⲩⲛ <text:line-break/><text:span text:style-name="T1"> </text:span><text:span text:style-name="T2">(54/27) </text:span> [ϫ]ⲉ̣ ⲡ̣ⲱ̣[ⲥ] ⲁⲩ{ϩ̅ⲓ} [ⲧ]ⲟⲟⲧⲟ̣ⲩ <text:line-break/><text:span text:style-name="T1"> </text:span><text:span text:style-name="T2">(54/28) </text:span> [ⲉ{ⲉ̅]̅ⲓ} ⲉⲡ̣[ⲉⲥ]ⲏⲧ’ ⲉⲡⲉⲉⲓⲙⲁ̣ <text:line-break/><text:span text:style-name="T1"> </text:span><text:span text:style-name="T2">(55/1) </text:span> [ϫⲉ] ⲉϥⲉϩⲱⲛ ⲉϩⲟⲩⲛ ⲉ[ <text:line-break/><text:span text:style-name="T1"> </text:span><text:span text:style-name="T2">(55/2) </text:span> [...]ⲛⲓⲕⲟⲩⲉⲓ ⲛ̅ⲛⲁⲗⲟ[ⲩ ⲁⲗⲗⲁ] <text:line-break/><text:span text:style-name="T1"> </text:span><text:span text:style-name="T2">(55/3) </text:span> [ⲉⲓ̈ⲟ]ⲩⲱϣ ⲉⲟⲩⲱⲛϩ̅ [ⲉⲃⲟⲗ ⲉ]‐ <text:line-break/><text:span text:style-name="T1"> </text:span><text:span text:style-name="T2">(55/4) </text:span> [ⲃⲟⲗ] {ϩ̅ⲓ}ⲧⲟⲟⲧⲕ̅· ⲙⲛ̅ ⲡⲓ̣[ⲡ̅ⲛⲁ̅] <text:line-break/><text:span text:style-name="T1"> </text:span><text:span text:style-name="T2">(55/5) </text:span> [ⲛ̅ⲧϭ]ⲟⲙ ⲛ̅ϥⲟⲩⲱⲛϩ̅ ⲉ̣ⲃ̣[ⲟⲗ] <text:line-break/><text:span text:style-name="T1"> </text:span><text:span text:style-name="T2">(55/6) </text:span> [ⲛ̅ⲛ]ⲟⲩⲕ ⲁⲩⲱ ⲥⲉⲟⲩⲱ̣[ⲛ ⲙ̅]‐ <text:line-break/><text:span text:style-name="T1"> </text:span><text:span text:style-name="T2">(55/7) </text:span> ⲡⲓⲣⲟ ⲉⲧⲛⲁⲛⲟⲩϥ ⲉⲃⲟⲗ̣ [{ϩ̅ⲓ}ⲧⲟ]‐ <text:line-break/><text:span text:style-name="T1"> </text:span><text:span text:style-name="T2">(55/8) </text:span> [ⲟ]ⲧⲕ̅· 〈ⲛ̅ϭⲓ〉 ⲛⲉⲧ’ⲟⲩⲱϣ ⲉ{ⲉ̅ⲓ} ⲉϩⲟⲩⲛ <text:line-break/><text:span text:style-name="T1"> </text:span><text:span text:style-name="T2">(55/9) </text:span> [ⲁ]ⲩⲱ ⲉⲩⲕⲱⲧⲉ ϫⲉⲕⲁⲁⲥ <text:line-break/><text:span text:style-name="T1"> </text:span><text:span text:style-name="T2">(55/10) </text:span> [ⲉ]ⲩⲉⲙⲟⲟϣⲉ {ϩ̅ⲓ} ⲧⲉ{ϩⲓ}ⲏ ⲉⲧ’ϣⲟ‐ <text:line-break/><text:span text:style-name="T1"> </text:span><text:span text:style-name="T2">(55/11) </text:span> [ⲟⲡ ϩ]ⲁ̣ⲑⲏ ⲙ̅ⲡⲓⲣⲟ· ⲁⲩⲱ ⲛ̅ⲥⲉ‐ <text:line-break/><text:span text:style-name="T1"> </text:span><text:span text:style-name="T2">(55/12) </text:span> [ⲟⲩⲁϩ]ⲟⲩ ⲛ̅ⲥⲱⲕ ⲛ̅ⲥⲉ{ⲉ̅ⲓ} ⲉϩⲟⲩⲛ <text:line-break/><text:span text:style-name="T1"> </text:span><text:span text:style-name="T2">(55/13) </text:span> [ⲛ̅ⲅ]ⲑⲡⲟⲟⲩ ⲉϩⲟⲩⲛ ⲛ̅ⲅϯ ⲡⲃⲉ‐ <text:line-break/><text:span text:style-name="T1"> </text:span><text:span text:style-name="T2">(55/14) </text:span> [ⲕ]ⲉ ⲙ̅ⲡⲟⲩⲁ ⲡⲟⲩⲁ ⲉⲧ’ⲡⲏϩ ⲉⲣⲟϥ <text:line-break/><text:span text:style-name="T1"> </text:span><text:span text:style-name="T2">(55/15) </text:span> ⲛ̅ⲧⲟⲕ ⲅⲁⲣ ⲁⲛ ⲡⲉ ⲡⲓⲣⲉϥⲥⲱⲧⲉ <text:line-break/><text:span text:style-name="T1"> </text:span><text:span text:style-name="T2">(55/16) </text:span> ⲙⲛ̅ⲛ ⲟⲩⲃⲟⲏⲑⲟⲥ ⲛ̅ⲧⲉ ϩⲉⲛ‐ <text:line-break/><text:span text:style-name="T1"> </text:span><text:span text:style-name="T2">(55/17) </text:span> ϣⲙ̅ⲙⲟ· ⲛ̅ⲧⲕ̅ ⲟⲩⲣⲉϥⲧⲟⲟⲧⲉ <text:line-break/><text:span text:style-name="T1"> </text:span><text:span text:style-name="T2">(55/18) </text:span> ⲉϩⲟⲩⲛ ⲙⲛ̅ ⲟⲩⲣⲉϥⲥⲱⲧⲉ <text:line-break/><text:span text:style-name="T1"> </text:span><text:span text:style-name="T2">(55/19) </text:span> ⲛ̅ⲧⲉ ⲛⲉⲧⲉ ⲛⲟⲩⲉⲓ· ϯⲛⲟⲩ ⲇⲉ <text:line-break/><text:span text:style-name="T1"> </text:span><text:span text:style-name="T2">(55/20) </text:span> ⲛ̅ⲧⲉ ⲛⲉⲧⲉ ⲛⲟⲩⲕ· ⲛ̅ⲧⲟⲕ ⲉⲕ̣[ⲉ]‐ <text:line-break/><text:span text:style-name="T1"> </text:span><text:span text:style-name="T2">(55/21) </text:span> ⲟⲩⲱⲛϩ̅ ⲉⲃⲟⲗ̓ ⲉⲕⲉⲛ̅ ⲁⲅⲁⲑⲟ̣[ⲛ] <text:line-break/><text:span text:style-name="T1"> </text:span><text:span text:style-name="T2">(55/22) </text:span> ⲛ̅ϩⲏⲧⲟⲩ ⲧⲏⲣⲟⲩ· ⲛ̅ⲧⲟⲕ ⲉ̣[ⲩⲉⲣ̅] <text:line-break/><text:span text:style-name="T1"> </text:span><text:span text:style-name="T2">(55/23) </text:span> ϣⲡⲏⲣⲉ ⲙ̅ⲙⲟⲕ ⲉϫⲛ̅ ϭⲟⲙ ⲛ[ⲓⲙ] <text:line-break/><text:span text:style-name="T1"> </text:span><text:span text:style-name="T2">(55/24) </text:span> ⲛ̅ⲧⲟⲕ ⲡⲉⲧⲉⲩⲣ̅ⲙⲁⲕⲁⲣⲓⲍⲉ̣ ⲙ̣̅‐ <text:line-break/><text:span text:style-name="T1"> </text:span><text:span text:style-name="T2">(55/25) </text:span> ⲙⲟⲕ ⲛ̅ϭⲓ ⲙ̅ⲡⲏⲟⲩⲉ· ⲛ̅ⲧ[ⲟⲕ] <text:line-break/><text:span text:style-name="T1"> </text:span><text:span text:style-name="T2">(55/26) </text:span> ⲉϥⲉⲕⲱϩ ⲉⲣⲟⲕ ⲛ̅ϭⲓ ⲡⲏ̣ [ⲉⲧⲁϥ]‐ <text:line-break/><text:span text:style-name="T1"> </text:span><text:span text:style-name="T2">(55/27) </text:span> ϯ ⲡⲓⲣⲁⲛ ⲉⲣⲟϥ ϫⲉ ⲡ̣[ϫⲟⲉⲓⲥ] <text:line-break/><text:span text:style-name="T1"> </text:span><text:span text:style-name="T2">(55/28) </text:span> [ⲛ̅]ⲧ̣ⲁⲕ̣ ⲁ̣ⲛ̣[ⲟ]ⲕ ⲉⲧⲡⲉ̣[ <text:line-break/><text:span text:style-name="T1"> </text:span><text:span text:style-name="T2">(55/29) </text:span> [ 8+- ]ⲩⲉ ⲉⲃⲟ[ⲗ <text:line-break/><text:soft-page-break/><text:span text:style-name="T1"> </text:span><text:span text:style-name="T2">(55/30) </text:span> [ 8+- ]ⲥⲏ[..]ⲣ̣[ <text:line-break/><text:span text:style-name="T1"> </text:span><text:span text:style-name="T2">(55/31) </text:span> [ 8+- ]ⲃⲟ[..].[ <text:line-break/><text:span text:style-name="T1"> </text:span><text:span text:style-name="T2">(56/1) </text:span> [ⲛⲏ ⲉ]ⲧ’ϫⲓ ⲥⲃⲱ ⲉⲛⲁⲓ̈ ⲛⲙ̅[ⲙⲁⲕ] <text:line-break/><text:span text:style-name="T1"> </text:span><text:span text:style-name="T2">(56/2) </text:span> [ⲉⲧⲃ]ⲏⲏⲧⲕ̅ ⲉⲩⲛⲁⲧⲁⲙ[ⲟⲟⲩ] <text:line-break/><text:span text:style-name="T1"> </text:span><text:span text:style-name="T2">(56/3) </text:span> [ⲉⲛⲁⲓ̈] ⲛ̅ⲥⲉⲙ̅ⲧⲟⲛ ⲙ̅ⲙ[ⲟⲟⲩ] <text:line-break/><text:span text:style-name="T1"> </text:span><text:span text:style-name="T2">(56/4) </text:span> [ⲉⲧⲃⲏ]ⲏⲧⲕ̅ ⲉⲩⲛⲁⲣ̅ ⲣ̅ⲣⲟ [ⲛ̅ⲥⲉ]‐ <text:line-break/><text:span text:style-name="T1"> </text:span><text:span text:style-name="T2">(56/5) </text:span> [ϣ]ⲱ̣ⲡ̣ⲉ ⲛ̅ⲣ̅ⲣⲟ· ⲉⲧⲃⲏⲏ[ⲧⲕ̅] <text:line-break/><text:span text:style-name="T1"> </text:span><text:span text:style-name="T2">(56/6) </text:span> [ⲉⲩ]ⲛ̣ⲁⲛⲁ ⲛ̅ⲛⲉⲓ̈ ⲉⲧⲟⲩⲛⲁ‐ <text:line-break/><text:span text:style-name="T1"> </text:span><text:span text:style-name="T2">(56/7) </text:span> [ⲛⲁ ⲛ]ⲁⲩ· ⲛ̅ⲧⲟⲕ ⲅⲁⲣ ϩⲱⲥ <text:line-break/><text:span text:style-name="T1"> </text:span><text:span text:style-name="T2">(56/8) </text:span> ⲉⲛⲧⲕ̅ ⲟⲩϣⲟⲣⲡ̅’ ⲉⲁⲕϯ <text:line-break/><text:span text:style-name="T1"> </text:span><text:span text:style-name="T2">(56/9) </text:span> {ϩ̅ⲓ}ⲱⲱⲕ· ⲛ̅ⲧⲟⲕ ⲟⲛ ⲡⲉ ⲡ̣‐ <text:line-break/><text:span text:style-name="T1"> </text:span><text:span text:style-name="T2">(56/10) </text:span> ϣⲟⲣⲡ̅̓ ⲉⲧⲛⲁⲕⲁⲁⲕϥ̅ [ⲁ]‐ <text:line-break/><text:span text:style-name="T1"> </text:span><text:span text:style-name="T2">(56/11) </text:span> ϩⲏⲟⲩ· ⲁⲩⲱ ⲉⲕⲉϣⲱ̣‐ <text:line-break/><text:span text:style-name="T1"> </text:span><text:span text:style-name="T2">(56/12) </text:span> ⲡⲉ ⲛ̅ⲑⲉ ⲉⲛⲉⲕϣⲟⲟⲡ’ ⲙ̅‐ <text:line-break/><text:span text:style-name="T1"> </text:span><text:span text:style-name="T2">(56/13) </text:span> ⲙⲟⲥ ϩⲁⲑⲏ ⲉⲙⲡⲁⲧⲉⲕⲕⲁ‐ <text:line-break/><text:span text:style-name="T1"> </text:span><text:span text:style-name="T2">(56/14) </text:span> ⲁⲕ ⲁϩⲏⲟⲩ· ⲁⲩⲱ ⲁϥϯ ⲡⲓ <text:line-break/><text:span text:style-name="T1"> </text:span><text:span text:style-name="T2">(56/15) </text:span> ⲉⲣⲱⲓ̈ ⲁϥⲙⲟⲗϩϥ̅ ⲛ̅ϩⲏⲧ’ ⲉϥ‐ <text:line-break/><text:span text:style-name="T1"> </text:span><text:span text:style-name="T2">(56/16) </text:span> ϫⲱ ⲙ̅ⲙⲟⲥ ϫⲉ ⲡⲁⲙⲉⲣⲓⲧ’ <text:line-break/><text:span text:style-name="T1"> </text:span><text:span text:style-name="T2">(56/17) </text:span> ⲉⲓⲥ ϩⲏⲏⲧⲉ ϯⲛⲁϭⲱⲗⲡ̅’ <text:line-break/><text:span text:style-name="T1"> </text:span><text:span text:style-name="T2">(56/18) </text:span> [ⲛ]ⲁⲕ ⲉⲃ̣ⲟⲗ ⲛ̅ⲛⲏ ⲉⲧⲉ ⲙ̅ⲡⲉ <text:line-break/><text:span text:style-name="T1"> </text:span><text:span text:style-name="T2">(56/19) </text:span> [ⲙ̅ⲡ]ⲏⲩⲉ ⲉⲓⲙⲉ ⲉⲣⲟⲟⲩ· ⲟⲩ‐ <text:line-break/><text:span text:style-name="T1"> </text:span><text:span text:style-name="T2">(56/20) </text:span> ⲧ̣ⲉ ⲛⲉⲩⲁⲣⲭⲱⲛ· ⲉⲓⲥ ϩⲏ‐ <text:line-break/><text:span text:style-name="T1"> </text:span><text:span text:style-name="T2">(56/21) </text:span> ⲏ̣ⲧⲉ ϯⲛⲁⲟⲩⲱⲛϩ̅ ⲛⲁⲕ <text:line-break/><text:span text:style-name="T1"> </text:span><text:span text:style-name="T2">(56/22) </text:span> [ⲉⲃ]ⲟ̣ⲗ ⲛ̅ⲛⲏ ⲉⲧ〈ⲉ〉 ⲙ̅ⲡⲉϥⲥⲟⲩ‐ <text:line-break/><text:span text:style-name="T1"> </text:span><text:span text:style-name="T2">(56/23) </text:span> [ⲱⲛⲟ]ⲩ ⲛ̅ϭⲓ ⲡⲏ ⲉⲧⲁ̣→ϥ←ϣ̣ⲟ̣ⲩ̣‐ <text:line-break/><text:span text:style-name="T1"> </text:span><text:span text:style-name="T2">(56/24) </text:span> [ϣⲟⲩ] ⲙ̅ⲙ̣ⲟ̣ϥ̣[ <text:line-break/><text:span text:style-name="T1"> </text:span><text:span text:style-name="T2">(56/25) </text:span> [....]ϫⲉ ⲁ̣[ <text:line-break/><text:span text:style-name="T1"> </text:span><text:span text:style-name="T2">(56/26) </text:span> [....]. ⲧ[..].[....ⲙⲛ̅] <text:line-break/><text:span text:style-name="T1"> </text:span><text:span text:style-name="T2">(57/1) </text:span> [ⲕⲉ]ⲟⲩⲁ ⲛ̅ⲥⲁ ⲁⲛⲟⲕ· ϯⲟⲛϩ̅ ⲁ[ⲛ] <text:line-break/><text:span text:style-name="T1"> </text:span><text:span text:style-name="T2">(57/2) </text:span> [ⲉⲃⲟⲗ] ϫⲉ ⲁⲛⲟⲕ ⲟⲩⲉⲓⲱⲧ’ ⲁⲛⲟⲕ <text:line-break/><text:span text:style-name="T1"> </text:span><text:span text:style-name="T2">(57/3) </text:span> [ⲙⲛ̅ ϭⲟ]ⲙ ⲙ̅ⲙⲟⲓ̈ ⲉϩⲱⲃ ⲛ̣ⲓ̣ⲙ̣· <text:line-break/><text:span text:style-name="T1"> </text:span><text:span text:style-name="T2">(57/4) </text:span> [ⲉⲓⲥ ϩ]ⲏ̣ⲏⲧⲉ ϯⲛⲁϭⲱⲗⲡ̅’̣ ⲛ̣ⲁⲕ̣ <text:line-break/><text:span text:style-name="T1"> </text:span><text:span text:style-name="T2">(57/5) </text:span> [ⲉⲃⲟⲗ] ⲛ̅ϩⲱⲃ ⲛⲓⲙ ⲡⲁⲙ̣ⲉ̣[ⲣⲓⲧ’] <text:line-break/><text:span text:style-name="T1"> </text:span><text:span text:style-name="T2">(57/6) </text:span> [ⲉⲓⲙ]ⲉ ⲁⲩⲱ ⲥⲟⲩⲱⲛⲟⲩ [ϫⲉⲕ]ⲁ̣‐ <text:line-break/><text:span text:style-name="T1"> </text:span><text:span text:style-name="T2">(57/7) </text:span> [ⲁ]ⲥ̣ ⲉⲕⲉ{ⲉ̅ⲓ} ⲉⲃⲟⲗ ⲛ̅ⲧⲉⲓ̈ϩⲏ ⲛ̣̅[ⲑ]ⲉ <text:line-break/><text:span text:style-name="T1"> </text:span><text:span text:style-name="T2">(57/8) </text:span> [ⲉ]ϯⲉ ⲙ̅ⲙⲟⲥ· ⲉⲓⲥ ϩⲏⲏⲧⲉ ϯ‐ <text:line-break/><text:span text:style-name="T1"> </text:span><text:span text:style-name="T2">(57/9) </text:span> [ⲛ]ⲁ̣ϭⲱⲗⲡ̅’ ⲛⲁⲕ ⲉⲃⲟⲗ ⲙⲡ̅ⲏ ⲉⲧ’‐ <text:line-break/><text:span text:style-name="T1"> </text:span><text:span text:style-name="T2">(57/10) </text:span> [ϩⲏ]ⲡ’̣[·] ϯⲛⲟⲩ ⲇⲉ ⲥⲟⲩⲧⲛ̅ ⲧⲉⲕ‐ <text:line-break/><text:span text:style-name="T1"> </text:span><text:span text:style-name="T2">(57/11) </text:span> [ϭⲓϫ ⲉⲃ]ⲟ̣ⲗ ϯⲛⲟⲩ ⲙⲟⲗϩⲕ̅ ⲛ̅ϩⲏⲧ’· <text:line-break/><text:span text:style-name="T1"> </text:span><text:span text:style-name="T2">(57/12) </text:span> [ⲁⲩ]ⲱ̣ ϯ̣ⲛⲟⲩ ⲁⲉⲓⲥⲟⲩⲧⲱⲛ ⲛⲁ‐ <text:line-break/><text:span text:style-name="T1"> </text:span><text:span text:style-name="T2">(57/13) </text:span> [ϭⲓ]ϫ ⲉⲃⲟⲗ ⲁⲩⲱ ⲙ̅ⲡⲓϩⲉ ⲉⲣⲟϥ <text:line-break/><text:span text:style-name="T1"> </text:span><text:span text:style-name="T2">(57/14) </text:span> ⲛ̅ⲑⲉ ⲉϯⲙⲉⲉⲩⲉ ⲉⲣⲟⲥ· ⲁⲗ‐ <text:line-break/><text:span text:style-name="T1"> </text:span><text:span text:style-name="T2">(57/15) </text:span> ⲗⲁ ⲙⲛ̅ⲛ̅ⲥⲱⲥ ⲁⲓ̈ⲥⲱⲧⲙ̅ ⲉⲣⲟϥ <text:line-break/><text:span text:style-name="T1"> </text:span><text:span text:style-name="T2">(57/16) </text:span> ⲉϥϫⲱ ⲙ̅ⲙⲟⲥ ϫⲉ ⲉⲓⲙⲉ ⲁⲩⲱ <text:line-break/><text:span text:style-name="T1"> </text:span><text:span text:style-name="T2">(57/17) </text:span> ⲙⲟⲗϩⲕ̅ ⲛ̅ϩⲏⲧ’· ⲧⲟⲧⲉ ⲁⲓ̈ⲉⲓ‐ <text:line-break/><text:span text:style-name="T1"> </text:span><text:span text:style-name="T2">(57/18) </text:span> ⲙⲉ ⲁⲩⲱ ⲁⲓ̈ⲣ̅ ϩⲟⲧⲉ· ⲁⲩⲱ <text:line-break/><text:span text:style-name="T1"> </text:span><text:span text:style-name="T2">(57/19) </text:span> ⲁⲉⲓⲣⲁϣⲉ ϩⲛ̅ⲛ ⲟⲩⲛⲟϭ ⲛ̅ⲣⲁϣⲉ <text:line-break/><text:soft-page-break/><text:span text:style-name="T1"> </text:span><text:span text:style-name="T2">(57/20) </text:span> ⲉⲧⲃⲉ ⲡⲁⲓ̈ ϯϫⲱ ⲙ̅ⲙⲟⲥ <text:line-break/><text:span text:style-name="T1"> </text:span><text:span text:style-name="T2">(57/21) </text:span> ⲛⲏⲧⲛ̅ ⲛⲓⲣⲉϥϯ ϩⲁⲡ’· ⲁⲩϯ <text:line-break/><text:span text:style-name="T1"> </text:span><text:span text:style-name="T2">(57/22) </text:span> ϩⲁⲡ’ ⲉⲣⲱⲧⲛ̅ ⲁⲩⲱ ⲙ̅ⲡⲉ‐ <text:line-break/><text:span text:style-name="T1"> </text:span><text:span text:style-name="T2">(57/23) </text:span> ⲧⲛ̅ϯ ⲥⲟ· ⲁⲗⲗⲁ ⲁⲩϯ ⲥⲟ <text:line-break/><text:span text:style-name="T1"> </text:span><text:span text:style-name="T2">(57/24) </text:span> ⲉⲣⲱⲧⲛ̅· ⲁⲣⲓⲛⲏⲫⲉ ⲁⲩⲱ̣ <text:line-break/><text:span text:style-name="T1"> </text:span><text:span text:style-name="T2">(57/25) </text:span> ⲥ̣[...]ⲛ̣.ⲛ̣[.].͂·.[.]ⲉⲩⲁ <text:line-break/><text:span text:style-name="T1"> </text:span><text:span text:style-name="T2">(57/26) </text:span> [ 10+- ]ⲏ̣[..]ⲁⲧⲉ̣ <text:line-break/><text:span text:style-name="T1"> </text:span><text:span text:style-name="T2">(57/27) </text:span> [ 14+- ]ⲱ. <text:line-break/><text:span text:style-name="T1"> </text:span><text:span text:style-name="T2">(57/28) </text:span> [ 14+- ]ⲩ̣ⲟ̣[ <text:line-break/><text:span text:style-name="T1"> </text:span><text:span text:style-name="T2">(58/1) </text:span> ⲛ̅ⲧⲱⲧⲛ̅ ⲛⲉⲧⲉⲧⲛ̅ⲥⲟ[ⲟⲩⲛ] <text:line-break/><text:span text:style-name="T1"> </text:span><text:span text:style-name="T2">(58/2) </text:span> ⲁⲛ ⲡⲉ· ⲛⲉⲛ̅ⲧⲟϥ ⲡⲉ [ⲡⲏ ⲉ]‐ <text:line-break/><text:span text:style-name="T1"> </text:span><text:span text:style-name="T2">(58/3) </text:span> ⲧⲙ̅ⲙ̣ⲁⲩ ⲉⲧⲉ ⲙ̅ⲡⲉϥ[ⲛⲁⲩ] <text:line-break/><text:span text:style-name="T1"> </text:span><text:span text:style-name="T2">(58/4) </text:span> ⲉⲣⲟϥ ⲛ̅ϭⲓ ⲡⲉⲛⲧⲁϥⲧⲁ[ⲙⲓⲉ] <text:line-break/><text:span text:style-name="T1"> </text:span><text:span text:style-name="T2">(58/5) </text:span> ⲧ̣ⲡ̣ⲉ ⲙⲛ̅ ⲡⲕⲁϩ ⲉϥϣⲟⲟ̣[ⲡ’] <text:line-break/><text:span text:style-name="T1"> </text:span><text:span text:style-name="T2">(58/6) </text:span> [ⲙ̅]ⲙ̣ⲟ̣ϥ· ⲛⲉⲛ̅ⲧⲟϥ ⲡⲉ ⲡⲁⲓ̈ [ⲉ]‐ <text:line-break/><text:span text:style-name="T1"> </text:span><text:span text:style-name="T2">(58/7) </text:span> [ⲧ]ⲉ ⲡⲱⲛϩ̅ ⲡⲉ· ⲛⲉⲛ̅ⲧⲟϥ <text:line-break/><text:span text:style-name="T1"> </text:span><text:span text:style-name="T2">(58/8) </text:span> ⲡⲉ ⲡⲟⲩⲟⲉⲓⲛ· ⲛⲉⲛ̅ⲧⲟϥ̣ <text:line-break/><text:span text:style-name="T1"> </text:span><text:span text:style-name="T2">(58/9) </text:span> ⲡⲉ ⲡⲏ ⲉⲧⲛⲉϣⲱⲡⲉ· <text:line-break/><text:span text:style-name="T1"> </text:span><text:span text:style-name="T2">(58/10) </text:span> ⲁⲩⲱ ⲡⲁⲗⲓⲛ ⲉϥⲉϯ [ⲛ̅ⲟⲩ]‐ <text:line-break/><text:span text:style-name="T1"> </text:span><text:span text:style-name="T2">(58/11) </text:span> ϫⲱⲕ ⲉⲃⲟⲗ ⲛ̅ⲧⲉ ⲛⲏ [ⲉⲧ]‐ <text:line-break/><text:span text:style-name="T1"> </text:span><text:span text:style-name="T2">(58/12) </text:span> ⲁⲩⲣ̅ⲁⲣⲭⲉⲓ ⲙⲛ̅ⲛ ⲟⲩⲁⲣⲭⲏ̣ <text:line-break/><text:span text:style-name="T1"> </text:span><text:span text:style-name="T2">(58/13) </text:span> ⲛ̅ⲧⲉ ⲛⲏ ⲉⲧⲛⲁϫⲱⲕ ⲉⲃⲟⲗ· <text:line-break/><text:span text:style-name="T1"> </text:span><text:span text:style-name="T2">(58/14) </text:span> ⲛⲉⲛ̅ⲧⲟϥ ⲡⲉ ⲡⲓⲡ̅ⲛ̅ⲁ̅ ⲉⲧⲟⲩ‐ <text:line-break/><text:span text:style-name="T1"> </text:span><text:span text:style-name="T2">(58/15) </text:span> ⲁⲃⲃ· ⲙⲛ̅ ⲡⲓⲁⲧⲛⲁⲩ ⲉⲣⲟϥ· <text:line-break/><text:span text:style-name="T1"> </text:span><text:span text:style-name="T2">(58/16) </text:span> ⲡⲏ ⲉⲧⲉ ⲙ̅ⲡⲉϥ{ⲉ̅ⲓ} ⲉⲡⲉⲥⲏⲧ’ <text:line-break/><text:span text:style-name="T1"> </text:span><text:span text:style-name="T2">(58/17) </text:span> ⲉϫⲙ̅ ⲡⲕⲁϩ· ⲛⲉⲛ̅ⲧⲟϥ ⲡⲉ <text:line-break/><text:span text:style-name="T1"> </text:span><text:span text:style-name="T2">(58/18) </text:span> ϯⲡⲁⲣⲑⲉⲛⲟⲥ ⲁⲩⲱ ⲡⲉ‐ <text:line-break/><text:span text:style-name="T1"> </text:span><text:span text:style-name="T2">(58/19) </text:span> ⲧⲉ ϣⲁϥⲟⲩⲟϣϥ̅ ϣⲁϥϣⲱ‐ <text:line-break/><text:span text:style-name="T1"> </text:span><text:span text:style-name="T2">(58/20) </text:span> ⲡⲉ ⲙⲙⲟϥ· ⲁⲛⲟⲕ ⲁⲓ̈ⲛⲁⲩ <text:line-break/><text:span text:style-name="T1"> </text:span><text:span text:style-name="T2">(58/21) </text:span> ⲉⲣⲟϥ ϫⲉ ⲛⲉϥⲕⲏⲕ ⲁϩⲏⲟⲩ <text:line-break/><text:span text:style-name="T1"> </text:span><text:span text:style-name="T2">(58/22) </text:span> ⲁⲩⲱ ⲛⲉⲙⲛ̅ ⲉⲛⲇⲩⲙⲁ ⲧⲟⲉ <text:line-break/><text:span text:style-name="T1"> </text:span><text:span text:style-name="T2">(58/23) </text:span> {ϩ̅ⲓ}ⲱⲱϥ· ⲡⲉⲧⲉ ϩⲛⲁϥ ϣⲁϥ‐ <text:line-break/><text:span text:style-name="T1"> </text:span><text:span text:style-name="T2">(58/24) </text:span> ϣⲱ[ⲡⲉ] ⲙ̅ⲙ̣ⲟ̣ϥ̣.[.]..[..].͂[ <text:line-break/><text:span text:style-name="T1"> </text:span><text:span text:style-name="T2">(58/25) </text:span> ⲥϥ̣ⲓ̣.[.]ⲉⲛ[ <text:line-break/><text:span text:style-name="T1"> </text:span><text:span text:style-name="T2">(58/26) </text:span> ⲧ.ⲁ̣[ <text:line-break/><text:span text:style-name="T1"> </text:span><text:span text:style-name="T2">(58/27) </text:span> ⲧ̣ϩ̣[ <text:line-break/><text:span text:style-name="T1"> </text:span><text:span text:style-name="T2">(59/1) </text:span> [ⲕ]ⲱ̣ ⲛ̅ⲥⲱⲧⲛ̅ ⲛ̅ⲧⲉⲓ̈{ϩ̅ⲓ}ⲏ ⲉⲧⲛⲁϣⲧ̅’ <text:line-break/><text:span text:style-name="T1"> </text:span><text:span text:style-name="T2">(59/2) </text:span> [ⲧⲁⲓ̈] ⲉⲧⲉ ⲛ̅ⲟⲩⲁⲧⲟ ⲛ̅ⲥⲙⲟⲧ’· <text:line-break/><text:span text:style-name="T1"> </text:span><text:span text:style-name="T2">(59/3) </text:span> [ⲁⲩⲱ] ⲙⲟⲟϣⲉ ⲕⲁⲧⲁ ⲡⲏ ⲉⲧⲉ ϩⲛⲁϥ <text:line-break/><text:span text:style-name="T1"> </text:span><text:span text:style-name="T2">(59/4) </text:span> [ϫⲉ ⲉ]ⲧ̣ⲉⲧⲛⲁϣⲱⲡⲉ ⲛ̅ϩⲉⲛⲣⲙ̅ϩⲉ <text:line-break/><text:span text:style-name="T1"> </text:span><text:span text:style-name="T2">(59/5) </text:span> [ⲛⲙ̅ⲙ]ⲁ̣ⲓ̈ ⲉⲁⲧⲉⲧⲛ̅ⲣ̅ ⲥⲁⲧⲡⲉ ⲛ̅ⲙ̣ⲛ̅ⲧ’‐ <text:line-break/><text:span text:style-name="T1"> </text:span><text:span text:style-name="T2">(59/6) </text:span> [ϫⲟⲉ]ⲓ̣ⲥ ⲛⲓⲙ· ⲟⲩ ⲅⲁⲣ ⲛ̅ϥⲛⲁ[ϯ ϩⲁ]ⲡ’̣ <text:line-break/><text:span text:style-name="T1"> </text:span><text:span text:style-name="T2">(59/7) </text:span> [ⲁ]ⲛ̣ ⲉϫⲛ̅ ⲛⲏ ⲉⲧⲁⲧⲉⲧⲛ̅ⲁⲁⲩ <text:line-break/><text:span text:style-name="T1"> </text:span><text:span text:style-name="T2">(59/8) </text:span> [ⲁ]ⲗ̣ⲗⲁ ϥⲛⲁⲛⲁ ⲛⲏⲧⲛ̅· ⲛ̅ⲧⲱⲧⲛ̅ <text:line-break/><text:span text:style-name="T1"> </text:span><text:span text:style-name="T2">(59/9) </text:span> [ⲅⲁ]ⲣ̣ ⲁⲛ ⲁⲧⲉⲧⲛ̅ⲁⲁⲩ· ⲁⲗⲗⲁ ⲡⲉ‐ <text:line-break/><text:span text:style-name="T1"> </text:span><text:span text:style-name="T2">(59/10) </text:span> [ⲧⲛ̅ϫ]ⲟ̣ⲉ̣ⲓⲥ ⲡⲉ· ⲛⲉⲩⲣⲉϥϭⲱⲛⲧ̅’ <text:line-break/><text:span text:style-name="T1"> </text:span><text:span text:style-name="T2">(59/11) </text:span> [ⲁⲛ ⲡⲉ] ⲁ̣ⲗⲗⲁ ⲛⲉⲩⲉⲓⲱⲧ’ ⲛ̅ⲭ̅ⲥ̅ ⲡⲉ <text:line-break/><text:soft-page-break/><text:span text:style-name="T1"> </text:span><text:span text:style-name="T2">(59/12) </text:span> [ⲛ̅ⲧⲱⲧ]ⲛ̣̅ ⲇⲉ ⲁⲧⲉⲧⲛ̅ϯ ϩⲁⲡ’ ⲉⲣⲱ‐ <text:line-break/><text:span text:style-name="T1"> </text:span><text:span text:style-name="T2">(59/13) </text:span> [ⲧ]ⲛ̣̅· ⲁⲩⲱ ⲉⲧⲃⲉ ⲡⲁⲓ̈ ⲧⲉⲧⲛⲁϭⲱ <text:line-break/><text:span text:style-name="T1"> </text:span><text:span text:style-name="T2">(59/14) </text:span> ϩ̣ⲛ̅ ⲛⲉⲩⲥⲛⲁⲟⲩϩ· ⲛ̅ⲧⲱⲧⲛ̅ ⲁⲧⲉ‐ <text:line-break/><text:span text:style-name="T1"> </text:span><text:span text:style-name="T2">(59/15) </text:span> ⲧⲛ̅ϩⲣⲁϣ ⲉϫⲛ̅ ⲧⲏⲛⲟⲩ· ⲁⲩⲱ ⲧⲉ <text:line-break/><text:span text:style-name="T1"> </text:span><text:span text:style-name="T2">(59/16) </text:span> ⲧⲛⲁⲣ̅ⲙⲉⲧⲁⲛⲟⲉⲓⲛ· ⲧⲉⲧⲛⲁϯ <text:line-break/><text:span text:style-name="T1"> </text:span><text:span text:style-name="T2">(59/17) </text:span> ϩⲏⲟⲩ ⲛ̅ⲗⲁⲁⲩ ⲁⲛ· ⲉⲛⲁⲩ ⲉⲡⲏ <text:line-break/><text:span text:style-name="T1"> </text:span><text:span text:style-name="T2">(59/18) </text:span> ⲉⲧ’ϣⲁϫⲉ· ⲁⲩⲱ ⲕⲱⲧⲉ ⲛ̅ⲥⲁ <text:line-break/><text:span text:style-name="T1"> </text:span><text:span text:style-name="T2">(59/19) </text:span> ⲡⲉⲧ’ⲕⲱ ⲛ̅ⲣⲱϥ· ⲥⲟⲩⲱⲛ ⲡⲏ <text:line-break/><text:span text:style-name="T1"> </text:span><text:span text:style-name="T2">(59/20) </text:span> ⲉⲧⲁϥⲉⲓ ⲉⲡⲉⲓ̈ⲙⲁ· ⲁⲩⲱ ⲉⲓⲙⲉ <text:line-break/><text:span text:style-name="T1"> </text:span><text:span text:style-name="T2">(59/21) </text:span> ⲉⲡⲉⲛⲧⲁϥ{ⲉ̅ⲓ} ⲉⲃⲟⲗ· ⲁⲛⲟⲕ ⲡⲉ <text:line-break/><text:span text:style-name="T1"> </text:span><text:span text:style-name="T2">(59/22) </text:span> ⲡⲓⲇⲓⲕⲁⲓⲟⲥ ⲁⲩⲱ ⲛ̅ϯϯ ϩⲁⲡ’ 〈ⲁⲛ〉 <text:line-break/><text:span text:style-name="T1"> </text:span><text:span text:style-name="T2">(59/23) </text:span> ⲛ̅ⲁⲛⲟⲕ ⲟⲩϫⲟⲉⲓⲥ ϭⲉ ⲁⲛ ⲁⲗⲗⲁ <text:line-break/><text:span text:style-name="T1"> </text:span><text:span text:style-name="T2">(59/24) </text:span> ⲁⲛⲟⲕ ⲟⲩⲃⲟⲏⲑⲟⲥ· ⲁⲩⲛⲟⲩϫⲉ <text:line-break/><text:span text:style-name="T1"> </text:span><text:span text:style-name="T2">(59/25) </text:span> ⲙ̅ⲙⲟϥ ⲉⲃⲟⲗ ϩⲁⲑⲏ ⲉⲙⲡⲁⲧⲉϥ‐ <text:line-break/><text:span text:style-name="T1"> </text:span><text:span text:style-name="T2">(59/26) </text:span> ⲥ̣ⲟⲩ̣ⲧ̣ⲱ̣ⲛ ⲧⲉϥϭⲓ̣ϫ ⲉ̣[ⲃ]ⲟⲗ· ⲁⲛⲟⲕ <text:line-break/><text:span text:style-name="T1"> </text:span><text:span text:style-name="T2">(59/27) </text:span> [ 14+- ]ⲟ̣ⲩⲱⲛ <text:line-break/><text:span text:style-name="T1"> </text:span><text:span text:style-name="T2">(59/28) </text:span> [ 17+- ]ϩ̣ <text:line-break/><text:span text:style-name="T1"> </text:span><text:span text:style-name="T2">(59/29) </text:span> [ <text:line-break/><text:span text:style-name="T1"> </text:span><text:span text:style-name="T2">(59/30) </text:span> [ 17+- ]ⲟ̣ⲗ̣ <text:line-break/><text:span text:style-name="T1"> </text:span><text:span text:style-name="T2">(60/1) </text:span> ⲁⲩⲱ ϥⲕⲱ ⲙ̅ⲙⲟⲓ̈ ⲉⲥⲱⲧ[ⲙ̅] <text:line-break/><text:span text:style-name="T1"> </text:span><text:span text:style-name="T2">(60/2) </text:span> ⲁⲩⲱ ⲛⲉⲧⲛ̅ⲥⲁⲗⲡⲓⲅ’ⲅⲟⲥ ⲙ̣[ⲛ̅] <text:line-break/><text:span text:style-name="T1"> </text:span><text:span text:style-name="T2">(60/3) </text:span> ⲛⲉⲧⲛ̅ⲥⲏⲃⲉ ϫⲱ ⲙ̅ⲙⲟⲟ[ⲩ] <text:line-break/><text:span text:style-name="T1"> </text:span><text:span text:style-name="T2">(60/4) </text:span> ⲙⲛ̅ ⲛⲉⲧⲛ̅ⲯⲁⲗⲧⲏⲣⲓⲟⲛ ⲛ̣̅[ⲧⲉ] <text:line-break/><text:span text:style-name="T1"> </text:span><text:span text:style-name="T2">(60/5) </text:span> ⲡ̣[ⲓ]ⲏ̣ⲓ̈· ⲡϫⲟⲉⲓⲥ ⲡⲉⲛⲧⲁϥⲣ̅ⲁ̣[ⲓ]‐ <text:line-break/><text:span text:style-name="T1"> </text:span><text:span text:style-name="T2">(60/6) </text:span> ⲭ̣[ⲙ]ⲁⲗⲱⲧⲉⲩⲉ ⲙ̅ⲙⲱⲧⲛ̅ <text:line-break/><text:span text:style-name="T1"> </text:span><text:span text:style-name="T2">(60/7) </text:span> ⲉ̣[ⲃ]ⲟⲗ ⲙ̅ⲡϫⲟⲉⲓⲥ· ⲉϥⲧⲱⲙ ⲛ̅‐ <text:line-break/><text:span text:style-name="T1"> </text:span><text:span text:style-name="T2">(60/8) </text:span> ⲛⲉⲧⲛ̅ⲙⲁⲁϫⲉ ϫⲉⲕⲁⲁⲥ ⲉ‐ <text:line-break/><text:span text:style-name="T1"> </text:span><text:span text:style-name="T2">(60/9) </text:span> ⲛⲉⲩⲥⲱⲧⲙ̅ ⲉⲧⲉⲥⲙⲏ ⲛ̅ⲧⲉ <text:line-break/><text:span text:style-name="T1"> </text:span><text:span text:style-name="T2">(60/10) </text:span> ⲡⲁϣⲁϫⲉ ⲁⲩⲱ ⲧⲉⲧⲛ[ⲁϣ ϯ] <text:line-break/><text:span text:style-name="T1"> </text:span><text:span text:style-name="T2">(60/11) </text:span> ϩⲧⲏⲧⲛ̅ ϩⲛ̅ ⲛⲧⲉⲛ̅ϩⲏⲧ’ [ⲁⲩⲱ] <text:line-break/><text:span text:style-name="T1"> </text:span><text:span text:style-name="T2">(60/12) </text:span> ⲧⲉⲧⲛⲁⲙⲟⲩⲧⲉ ⲉⲣⲟⲓ̈ ϫⲉ ⲡⲇⲓ‐ <text:line-break/><text:span text:style-name="T1"> </text:span><text:span text:style-name="T2">(60/13) </text:span> ⲕⲁⲓⲟⲥ· ⲉⲧⲃⲉ ⲡⲁⲓ̈ ϯϫⲱ ⲙ̅‐ <text:line-break/><text:span text:style-name="T1"> </text:span><text:span text:style-name="T2">(60/14) </text:span> ⲙⲟⲥ ⲛⲏⲧⲛ̅ ϫⲉ ⲉⲓⲥ ϩⲏⲧⲉ ⲁⲓ̈ϯ <text:line-break/><text:span text:style-name="T1"> </text:span><text:span text:style-name="T2">(60/15) </text:span> ⲛϩⲏⲧⲛ̅ ⲙ̅ⲡⲉⲧⲛ̅ⲏⲓ̈· ⲡⲉⲧⲉ‐ <text:line-break/><text:span text:style-name="T1"> </text:span><text:span text:style-name="T2">(60/16) </text:span> ⲧⲛ̅ϫⲱ ⲙ̅ⲙⲟⲥ ϫⲉ ⲡⲛⲟⲩⲧⲉ <text:line-break/><text:span text:style-name="T1"> </text:span><text:span text:style-name="T2">(60/17) </text:span> ⲁϥⲧⲁⲙⲓⲟϥ· ⲡⲏ ⲉⲧⲉ ϩⲣⲁⲓ̈ <text:line-break/><text:span text:style-name="T1"> </text:span><text:span text:style-name="T2">(60/18) </text:span> ⲛ̅ϩⲏⲧϥ̅ ⲁϥⲉⲣⲏⲧ’ ⲉϯ ⲛⲏⲧⲛ̅ <text:line-break/><text:span text:style-name="T1"> </text:span><text:span text:style-name="T2">(60/19) </text:span> ⲛ̅ⲛⲟⲩⲕⲗⲏⲣⲟⲛⲟⲙⲓⲁ ⲛ̅ϩⲏⲧϥ̅ <text:line-break/><text:span text:style-name="T1"> </text:span><text:span text:style-name="T2">(60/20) </text:span> ⲡⲁⲓ̈ ϯⲛⲁⲕⲁⲁϥ ⲉϩⲣⲁⲓ̈ ⲉⲩ‐ <text:line-break/><text:span text:style-name="T1"> </text:span><text:span text:style-name="T2">(60/21) </text:span> ⲧⲁⲕⲟ ⲙⲛ̅ ⲟⲩⲥⲱⲃⲉ ⲛ̅ⲧⲉ ⲛⲏ <text:line-break/><text:span text:style-name="T1"> </text:span><text:span text:style-name="T2">(60/22) </text:span> ⲉⲧ’ϣⲟⲟⲡ’ ϩⲛ̅ ⲟⲩⲙⲛ̅ⲧ’ⲁⲧ’‐ <text:line-break/><text:span text:style-name="T1"> </text:span><text:span text:style-name="T2">(60/23) </text:span> ⲉⲓⲙⲉ· ⲉⲓⲥ ϩⲏⲏⲧⲉ ⲅⲁⲣ ⲥⲉ‐ <text:line-break/><text:span text:style-name="T1"> </text:span><text:span text:style-name="T2">(60/24) </text:span> ϣⲟϫⲛⲉ ⲛ̅ϭⲓ ⲛⲏ ⲉⲧ’ϯ ϩⲁ̣ⲡ’ <text:line-break/><text:span text:style-name="T1"> </text:span><text:span text:style-name="T2">(60/25) </text:span> ⲉⲓ̈ⲣⲉ̣[ 12+- ]ⲙ̣ <text:line-break/><text:span text:style-name="T1"> </text:span><text:span text:style-name="T2">(60/26) </text:span> ⲙ̅.[ 14+- ]. <text:line-break/><text:span text:style-name="T1"> </text:span><text:span text:style-name="T2">(60/27) </text:span> (3+- lines lacking) <text:line-break/><text:span text:style-name="T1"> </text:span><text:span text:style-name="T2">(61/1) </text:span> [ⲙ̅]ⲡ̣ⲉϩⲟⲟⲩ ⲉⲧⲙ̅ⲙⲁⲩ ⲛⲉⲣⲉ‐ <text:line-break/><text:soft-page-break/><text:span text:style-name="T1"> </text:span><text:span text:style-name="T2">(61/2) </text:span> ⲡ̣[ⲗⲁⲟ]ⲥ ⲧⲏⲣϥ̅ ⲛⲉϥϣⲧⲣ̅ⲧⲱⲣ <text:line-break/><text:span text:style-name="T1"> </text:span><text:span text:style-name="T2">(61/3) </text:span> ⲙⲛ̅ ⲡ̣ⲙⲏⲏϣⲉ· ⲁⲩⲱ ⲛⲉⲩ‐ <text:line-break/><text:span text:style-name="T1"> </text:span><text:span text:style-name="T2">(61/4) </text:span> ⲟⲩⲟⲛϩ̅ ⲉⲃⲟⲗ ϩⲱⲥ ⲉⲙⲡⲟⲩⲧⲱⲧ’ <text:line-break/><text:span text:style-name="T1"> </text:span><text:span text:style-name="T2">(61/5) </text:span> ⲛ̅ϩⲏⲧ’· ⲁⲩⲱ ⲁϥⲧⲱⲱⲛ ⲁϥ{ⲉ̅ⲓ} <text:line-break/><text:span text:style-name="T1"> </text:span><text:span text:style-name="T2">(61/6) </text:span> ⲉ̣ⲃⲟⲗ ⲉϥϫⲱ ⲙ̅ⲙⲟⲥ ⲛ̅ⲧⲉⲓ̣̈ϩ̣[ⲉ] <text:line-break/><text:span text:style-name="T1"> </text:span><text:span text:style-name="T2">(61/7) </text:span> ⲁϥ{ⲉ̅ⲓ} ⲇⲉ ⲉϩⲟⲩⲛ ⲙ̅ⲡⲓϩⲟⲟⲩ [ⲁ]ϥ̣‐ <text:line-break/><text:span text:style-name="T1"> </text:span><text:span text:style-name="T2">(61/8) </text:span> ϣⲁϫⲉ ⲛ̅ϩⲉⲛⲕⲟⲩⲉⲓ ⲛ̅ⲟⲩⲛⲟⲩ· <text:line-break/><text:span text:style-name="T1"> </text:span><text:span text:style-name="T2">(61/9) </text:span> [ⲁ]ⲛⲟⲕ ⲇⲉ ⲛⲉⲓ̈ⲙⲛ̅ ⲛⲓⲟⲩⲏⲏⲃ <text:line-break/><text:span text:style-name="T1"> </text:span><text:span text:style-name="T2">(61/10) </text:span> ⲁⲩⲱ ⲛⲉⲓ̈ⲟⲩⲱⲛϩ̅ ⲗⲁⲁⲩ ⲉⲃⲟⲗ ⲁⲛ <text:line-break/><text:span text:style-name="T1"> </text:span><text:span text:style-name="T2">(61/11) </text:span> ⲡ̣ⲉ̣ ⲛ̅ⲧ̣ⲉ ϯⲙⲛ̅ⲧ’ⲥⲩⲛⲅⲉⲛⲏⲥ· <text:line-break/><text:span text:style-name="T1"> </text:span><text:span text:style-name="T2">(61/12) </text:span> [ⲉ]ⲡ̣[ⲓ]ⲇ̣ⲏ ⲛⲉⲩϫⲱ ⲙ̅ⲙⲟⲥ ⲧⲏⲣⲟⲩ <text:line-break/><text:span text:style-name="T1"> </text:span><text:span text:style-name="T2">(61/13) </text:span> ϩⲛ̅ⲛ ⲟⲩⲥⲙⲏ ⲟⲩⲟⲧⲉ ϫⲉ ⲁⲙⲏ‐ <text:line-break/><text:span text:style-name="T1"> </text:span><text:span text:style-name="T2">(61/14) </text:span> ⲉⲓⲧⲛ̅ ⲛ̅ⲧⲛ̅{ϩ̅ⲓ} ⲱⲛⲉ ⲉϫⲛ̅ ⲡⲇⲓⲕⲁⲓ‐ <text:line-break/><text:span text:style-name="T1"> </text:span><text:span text:style-name="T2">(61/15) </text:span> ⲟⲥ· ⲁⲩⲱ ⲁⲩⲧⲱⲟⲩⲛⲟⲩ <text:line-break/><text:span text:style-name="T1"> </text:span><text:span text:style-name="T2">(61/16) </text:span> ⲉⲩϫⲱ ⲙ̅ⲙⲟⲥ ϫⲉ ⲉϩⲉ ⲙⲁ‐ <text:line-break/><text:span text:style-name="T1"> </text:span><text:span text:style-name="T2">(61/17) </text:span> ⲣⲛ̅ϩⲱⲧⲃ̅ ⲙ̅ⲡⲓⲣⲱⲙⲉ ⲛ̅ⲥⲉ‐ <text:line-break/><text:span text:style-name="T1"> </text:span><text:span text:style-name="T2">(61/18) </text:span> ϥⲓⲧϥ̅ ⲉⲃⲟⲗ ϩⲛ̅ ⲧⲉⲛⲙⲏⲧⲉ· ϥⲛⲁ‐ <text:line-break/><text:span text:style-name="T1"> </text:span><text:span text:style-name="T2">(61/19) </text:span> ⲣ̅ ϣⲁⲩ ⲅⲁⲣ ⲛⲁⲛ ⲁⲛ ϩⲛ̅ ⲗⲁⲁⲩ· <text:line-break/><text:span text:style-name="T1"> </text:span><text:span text:style-name="T2">(61/20) </text:span> ⲛⲉⲩⲙ̅ⲙⲁⲩ ⲇⲉ ⲡⲉ ⲁⲩϩⲉ ⲉⲣⲟϥ <text:line-break/><text:span text:style-name="T1"> </text:span><text:span text:style-name="T2">(61/21) </text:span> ⲉϥⲁϩⲉⲣⲁⲧϥ̅ ϩⲁⲧⲛ̅ ⲡⲓⲧⲛ̅ϩ ⲛ̅ⲧⲉ <text:line-break/><text:span text:style-name="T1"> </text:span><text:span text:style-name="T2">(61/22) </text:span> ⲡⲉⲣⲡⲉ ϩⲁⲧⲛ̅ ⲡⲓⲱⲛⲉ ⲉⲧ’ϫⲟⲟⲣ <text:line-break/><text:span text:style-name="T1"> </text:span><text:span text:style-name="T2">(61/23) </text:span> ⲛ̅ⲕⲟⲟϩ· ⲁⲩⲱ ⲁⲩⲧⲱϣ ⲉⲛⲟⲩ‐ <text:line-break/><text:span text:style-name="T1"> </text:span><text:span text:style-name="T2">(61/24) </text:span> ϫⲉ ⲙ̅ⲙⲟϥ ⲉⲡⲉⲥⲏⲧ’ ⲉⲃⲟⲗ ϩⲙ̅ <text:line-break/><text:span text:style-name="T1"> </text:span><text:span text:style-name="T2">(61/25) </text:span> ⲡϫⲓⲥⲉ· ⲁⲩⲱ ⲁⲩⲛⲟⲩϫⲉ <text:line-break/><text:span text:style-name="T1"> </text:span><text:span text:style-name="T2">(61/26) </text:span> ⲙ̅ⲙⲟϥ ⲉⲡⲉⲥⲏⲧ’ ⲛ̣̅ⲧⲟⲟⲩ <text:line-break/><text:span text:style-name="T1"> </text:span><text:span text:style-name="T2">(61/27) </text:span> ⲇⲉ [...].[..].[.....]ⲁⲩⲛⲁ̣. <text:line-break/><text:span text:style-name="T1"> </text:span><text:span text:style-name="T2">(61/28) </text:span> ⲉⲓ..[ 10+- ].ⲩⲧⲱ <text:line-break/><text:span text:style-name="T1"> </text:span><text:span text:style-name="T2">(61/29) </text:span> .[ <text:line-break/><text:span text:style-name="T1"> </text:span><text:span text:style-name="T2">(62/1) </text:span> ⲁⲩⲁⲙⲁϩⲧⲉ ⲙ̅ⲙⲟϥ ⲁⲩⲥⲱ[ϣ ⲙ̅]‐ <text:line-break/><text:span text:style-name="T1"> </text:span><text:span text:style-name="T2">(62/2) </text:span> ⲙⲟϥ ⲉⲩⲥⲩⲣⲉ ⲙ̅ⲙⲟϥ {ϩ̅ⲓ} ⲡ[ⲕ]ⲁϩ· <text:line-break/><text:span text:style-name="T1"> </text:span><text:span text:style-name="T2">(62/3) </text:span> ⲁⲩⲕⲉⲥⲕⲱⲥϥ̅ ⲉⲃⲟⲗ· ⲁⲩⲕⲁ <text:line-break/><text:span text:style-name="T1"> </text:span><text:span text:style-name="T2">(62/4) </text:span> ⲟⲩⲱⲛⲉ {ϩ̅ⲓ}ϫⲛ̅ ⲛⲉϥⲙⲁϩⲧ̅’· <text:line-break/><text:span text:style-name="T1"> </text:span><text:span text:style-name="T2">(62/5) </text:span> ⲁⲩⲕⲁ ⲛⲉⲩⲟⲩⲉⲣⲏⲧⲉ {ϩ̅ⲓ}ϫⲱϥ <text:line-break/><text:span text:style-name="T1"> </text:span><text:span text:style-name="T2">(62/6) </text:span> ⲧⲏ̣ⲣⲟⲩ ⲉⲩϫⲱ ⲙ̅ⲙⲟⲥ ϫⲉ <text:line-break/><text:span text:style-name="T1"> </text:span><text:span text:style-name="T2">(62/7) </text:span> ⲡⲉⲛⲧⲁϥⲥⲱⲣⲙ̅· ⲡⲁⲗⲓⲛ ⲟⲛ <text:line-break/><text:span text:style-name="T1"> </text:span><text:span text:style-name="T2">(62/8) </text:span> ⲁⲩⲧⲟⲩⲛⲟⲥϥ̅ ⲉϥⲟⲛϩ̅ ⲁⲩⲧⲣⲉϥ‐ <text:line-break/><text:span text:style-name="T1"> </text:span><text:span text:style-name="T2">(62/9) </text:span> ϣⲓⲕⲉ ⲛ̅ⲛⲟⲩ{ϩ̅ⲓ}ⲉⲓⲧ’ ⲁⲩⲧⲁϩⲟϥ <text:line-break/><text:span text:style-name="T1"> </text:span><text:span text:style-name="T2">(62/10) </text:span> ⲉⲣⲁⲧϥ̅ ⲛ̅ϩⲏⲧϥ̅ ⲉⲁⲩϩⲟϥⲥϥ̅ <text:line-break/><text:span text:style-name="T1"> </text:span><text:span text:style-name="T2">(62/11) </text:span> ϣⲁϩⲣⲁⲓ̈ ⲉⲛⲉϥⲙⲁϩⲧ̅’· ⲁⲩ{ϩ̅ⲓ} <text:line-break/><text:span text:style-name="T1"> </text:span><text:span text:style-name="T2">(62/12) </text:span> ⲱⲛⲉ ⲉϫⲱϥ ⲛ̅ⲧⲉⲓ̈ϩⲉ· ⲛ̅ⲧⲟϥ <text:line-break/><text:span text:style-name="T1"> </text:span><text:span text:style-name="T2">(62/13) </text:span> ⲇⲉ ⲁϥⲥⲟⲩⲧⲱⲛ ⲛⲉϥϭⲓϫ ⲉⲃⲟⲗ <text:line-break/><text:span text:style-name="T1"> </text:span><text:span text:style-name="T2">(62/14) </text:span> ⲁϥϫⲱ ⲛ̅ⲧⲉⲓ̈ⲡⲣⲟⲥⲉⲩⲭⲏ <text:line-break/><text:span text:style-name="T1"> </text:span><text:span text:style-name="T2">(62/15) </text:span> ⲧⲉⲓ̈ ⲁⲛ ⲉⲧⲉϥⲥⲩⲛⲏⲑⲓ ⲡⲉ ϫⲟⲟⲥ <text:line-break/><text:span text:style-name="T1"> </text:span><text:span text:style-name="T2">(62/16) </text:span> ϫⲉ ⲡⲁⲛⲟⲩⲧⲉ ⲁⲩⲱ ⲡⲁⲓ̈ⲱⲧ’ <text:line-break/><text:span text:style-name="T1"> </text:span><text:span text:style-name="T2">(62/17) </text:span> ⲡⲉⲛⲧⲁϥⲛⲁϩⲙⲉⲧ’ ⲉⲃⲟⲗ ϩⲛ̅ <text:line-break/><text:span text:style-name="T1"> </text:span><text:span text:style-name="T2">(62/18) </text:span> ϯϩⲉⲗⲡⲓⲥ ⲉⲥⲙⲟⲟⲩⲧ’· <text:line-break/><text:span text:style-name="T1"> </text:span><text:span text:style-name="T2">(62/19) </text:span> ⲡⲉⲛⲧⲁϥⲧⲁⲛϩⲟⲉⲓ ϩⲛ̅ⲛ ⲟⲩ‐ <text:line-break/><text:soft-page-break/><text:span text:style-name="T1"> </text:span><text:span text:style-name="T2">(62/20) </text:span> ⲙⲩⲥⲧⲏⲣⲓⲟⲛ ⲛ̅ⲧⲉ ⲡⲉⲧⲉ ϩⲛⲁϥ· <text:line-break/><text:span text:style-name="T1"> </text:span><text:span text:style-name="T2">(62/21) </text:span> ⲛⲉⲕⲧⲣⲉⲩⲱⲥⲕ̅ ⲛⲁⲓ̈ ⲛ̅ϭⲓ <text:line-break/><text:span text:style-name="T1"> </text:span><text:span text:style-name="T2">(62/22) </text:span> ⲛⲉⲓ̈ϩⲟⲟⲩ ⲛ̅ⲧⲉ ⲡⲉⲓ̈ⲕⲟⲥⲙⲟⲥ· <text:line-break/><text:span text:style-name="T1"> </text:span><text:span text:style-name="T2">(62/23) </text:span> ⲁⲗⲗⲁ ⲡⲉϩⲟⲟⲩ ⲛ̅ⲧⲉ ⲡⲉⲕ‐ <text:line-break/><text:span text:style-name="T1"> </text:span><text:span text:style-name="T2">(62/24) </text:span> ⲟⲩⲟⲉ[ⲓⲛ 6+-]ⲡ̅’̣[..]ϣ̣ⲟ̣ϫⲡ̅’ <text:line-break/><text:span text:style-name="T1"> </text:span><text:span text:style-name="T2">(62/25) </text:span> ⲛ̅ϩⲏⲧ̣[ 11+- ]ⲩ̣ <text:line-break/><text:span text:style-name="T1"> </text:span><text:span text:style-name="T2">(62/26) </text:span> ϣ.[ 12+- ].ⲱⲛ <text:line-break/><text:span text:style-name="T1"> </text:span><text:span text:style-name="T2">(62/27) </text:span> ⲁⲛ[ <text:line-break/><text:span text:style-name="T1"> </text:span><text:span text:style-name="T2">(63/1) </text:span> [ⲟⲩ]ϫ̣ⲁ̣ⲓ̣̈· ⲃⲟⲗⲧ̅’ ⲉⲃⲟⲗ ⲛ̅ⲥⲁⲃⲟⲗ ⲙ̅ⲡⲉⲓ̈‐ <text:line-break/><text:span text:style-name="T1"> </text:span><text:span text:style-name="T2">(63/2) </text:span> ⲙ̣[ⲁ ⲛ̅ϭ]ⲟ̣ⲉⲓⲗⲉ· ⲙ̅ⲡⲣ̅ⲧⲣⲉϥϣⲱϫⲡ̅’ <text:line-break/><text:span text:style-name="T1"> </text:span><text:span text:style-name="T2">(63/3) </text:span> ⲛ̅ϩⲏⲧ̅’̣ ⲛ̅ϭⲓ ⲡⲉⲕϩⲙⲟⲧ’· ⲁⲗⲗⲁ ⲙⲁ‐ <text:line-break/><text:span text:style-name="T1"> </text:span><text:span text:style-name="T2">(63/4) </text:span> ⲣⲉϥϣⲱⲡⲉ ⲉϥⲟⲩⲁⲁⲃ ⲛ̅ϭⲓ ⲡⲉⲕ‐ <text:line-break/><text:span text:style-name="T1"> </text:span><text:span text:style-name="T2">(63/5) </text:span> ϩⲙⲟⲧ’· ⲛⲁϩⲙⲉⲧ’ ⲉⲃⲟⲗ ⲛ̅ⲛⲟⲩ‐ <text:line-break/><text:span text:style-name="T1"> </text:span><text:span text:style-name="T2">(63/6) </text:span> ⲙⲟⲩ ⲉϥϩⲟⲟⲩ· ⲁⲛⲓⲧ’ ⲉⲃⲟⲗ ϩⲛ̅‐ <text:line-break/><text:span text:style-name="T1"> </text:span><text:span text:style-name="T2">(63/7) </text:span> ⲛ ⲟⲩⲙ̅ϩⲁⲟⲩ ⲉⲓ̈ⲟⲛϩ̅· ϫⲉ ϥⲟⲛϩ̅ ⲛ̅‐ <text:line-break/><text:span text:style-name="T1"> </text:span><text:span text:style-name="T2">(63/8) </text:span> ϩⲏⲧ’ ⲛ̅ϭⲓ ⲡⲉⲕϩⲙⲟⲧ’· ⲡⲉⲣⲱⲥ <text:line-break/><text:span text:style-name="T1"> </text:span><text:span text:style-name="T2">(63/9) </text:span> ⲉⲣ̅ ϩⲱⲃ ⲛ̅ⲟⲩϩⲱⲃ ⲛ̅ⲧⲉ ⲟⲩⲡⲗⲏ‐ <text:line-break/><text:span text:style-name="T1"> </text:span><text:span text:style-name="T2">(63/10) </text:span> ⲣⲱⲙⲁ· ⲛⲁϩⲙⲉⲧ’ ⲉⲃⲟⲗ ϩⲛ̅ⲛ ⲟⲩ‐ <text:line-break/><text:span text:style-name="T1"> </text:span><text:span text:style-name="T2">(63/11) </text:span> ⲥⲁⲣⲝ̅ ⲛ̅ⲛⲟⲃⲉ· ϫⲉ ⲁⲓ̈ⲧⲱⲧ’ ⲛ̅‐ <text:line-break/><text:span text:style-name="T1"> </text:span><text:span text:style-name="T2">(63/12) </text:span> ϩⲏⲧⲕ̅ ϩⲛ̅ ⲧⲁϭⲟⲙ ⲧⲏⲣⲥ̅· ϫⲉ ⲛ̅ⲧⲟⲕ <text:line-break/><text:span text:style-name="T1"> </text:span><text:span text:style-name="T2">(63/13) </text:span> ⲡⲉ ⲡⲱⲛϩ̅ ⲛ̅ⲧⲉ ⲡⲱⲛϩ̅· ⲛⲁϩⲙⲉⲧ’ <text:line-break/><text:span text:style-name="T1"> </text:span><text:span text:style-name="T2">(63/14) </text:span> ⲉⲃⲟⲗ {ϩ̅ⲓ}ⲧⲟⲟⲧϥ̅ ⲛ̅ⲛⲟⲩϫⲁϫⲉ ⲛ̅‐ <text:line-break/><text:span text:style-name="T1"> </text:span><text:span text:style-name="T2">(63/15) </text:span> ⲣⲉϥⲑⲃ̅ⲃⲓⲟ· ⲛⲉⲕⲧⲁⲁⲧ’ ⲉⲧⲟⲟⲧϥ̅ <text:line-break/><text:span text:style-name="T1"> </text:span><text:span text:style-name="T2">(63/16) </text:span> ⲛ̅ⲛⲟⲩⲣⲉϥϯϩⲁⲡ’· ⲛ̅ⲣⲉϥϣⲱⲱⲧ’ <text:line-break/><text:span text:style-name="T1"> </text:span><text:span text:style-name="T2">(63/17) </text:span> ⲉⲃⲟⲗ ϩⲙ̅ ⲡⲛⲟⲃⲉ· ⲕⲱ ⲛⲁⲓ̈ ⲉⲃⲟⲗ <text:line-break/><text:span text:style-name="T1"> </text:span><text:span text:style-name="T2">(63/18) </text:span> ⲛ̅ⲛⲏ ⲉⲧⲉⲣⲟⲓ̈ ⲧⲏⲣⲟⲩ ⲛ̅ⲧⲉ ⲛⲉ‐ <text:line-break/><text:span text:style-name="T1"> </text:span><text:span text:style-name="T2">(63/19) </text:span> ϩⲟⲟⲩ ϫⲉ ϯⲟⲛϩ̅ ⲁⲛⲟⲕ ϩⲣⲁⲓ̈ ⲛ̅‐ <text:line-break/><text:span text:style-name="T1"> </text:span><text:span text:style-name="T2">(63/20) </text:span> ϩⲏⲧⲕ̅· ϥⲟⲛϩ̅ ⲛ̅ϩⲏⲧ’ ⲛ̅ϭⲓ ⲡⲉⲕ‐ <text:line-break/><text:span text:style-name="T1"> </text:span><text:span text:style-name="T2">(63/21) </text:span> ϩⲙⲟⲧ’· ⲁⲓ̈ⲣ̅ⲁⲣⲛⲓⲥⲑⲉ ⲛ̅ⲟⲩⲟⲛ <text:line-break/><text:span text:style-name="T1"> </text:span><text:span text:style-name="T2">(63/22) </text:span> ⲛⲓⲙ· ⲛ̅ⲧⲟⲕ ⲇⲉ ⲁⲓ̈ⲟⲩⲟⲛϩⲕ̅ ⲉⲃⲟⲗ· <text:line-break/><text:span text:style-name="T1"> </text:span><text:span text:style-name="T2">(63/23) </text:span> ⲛⲁϩⲙⲉⲧ’ ⲉⲃⲟⲗ ϩⲛ̅ⲛ ⲟⲩⲑⲗⲓⲯⲓⲥ <text:line-break/><text:span text:style-name="T1"> </text:span><text:span text:style-name="T2">(63/24) </text:span> ⲉⲥϩⲟⲟⲩ· ϯⲛⲟⲩ ⲇⲉ ⲡⲟⲩⲟ[ⲉⲓϣ] <text:line-break/><text:span text:style-name="T1"> </text:span><text:span text:style-name="T2">(63/25) </text:span> ⲡ̣ⲉ ⲁⲩⲱ ⲧⲟⲩⲛⲟⲩ ⲧⲉ· ⲡⲓⲡ̣̅̅[̅ⲛ̅ⲁ̅] <text:line-break/><text:span text:style-name="T1"> </text:span><text:span text:style-name="T2">(63/26) </text:span> ⲉⲧⲟⲩⲁⲁⲃ’ ⲙⲁⲧⲛ̅ⲛⲟⲟⲩ ϩ̣ⲁ[ⲣⲟⲓ̈] <text:line-break/><text:span text:style-name="T1"> </text:span><text:span text:style-name="T2">(63/27) </text:span> ⲛ̅ⲟⲩⲟⲩϫ[ⲁⲓ̈.]ⲡⲟⲩ̣ⲟ̣ⲉ̣ⲓ̣ⲛ̣[ <text:line-break/><text:span text:style-name="T1"> </text:span><text:span text:style-name="T2">(63/28) </text:span> ⲡⲟⲩⲟⲉⲓⲛ [..]ⲉ̣ϯ.ⲏϣ̣[ <text:line-break/><text:span text:style-name="T1"> </text:span><text:span text:style-name="T2">(63/29) </text:span> ϩⲛ̅ ⲟⲩϭⲟⲙ[...]ⲉ̣[..]ⲕⲟ ⲛ̅[ <text:line-break/><text:span text:style-name="T1"> </text:span><text:span text:style-name="T2">(63/30) </text:span> ⲛ̅ⲧⲉⲣⲉϥϫⲟ̣[ⲟⲥ ⲁϥⲕ]ⲁⲣⲱ[ϥ <text:line-break/><text:span text:style-name="T1"> </text:span><text:span text:style-name="T2">(63/31) </text:span> ϣⲁϫⲉ̣ ϫ̣[...].ⲁ̣[.]ϥⲉ̣[....ⲙⲛ̅] <text:line-break/><text:span text:style-name="T1"> </text:span><text:span text:style-name="T2">(63/32) </text:span> ⲛ̅ⲥⲱ[ⲥ...]ⲡ̣̅ⲗⲟⲅⲟ̣ⲥ̣.[ </text:p>
      <text:p text:style-name="P1"/>
      <text:p text:style-name="P4">( codex V ) The Apocalypse of Adam</text:p>
      <text:p text:style-name="P2"><text:span text:style-name="T1"> </text:span><text:span text:style-name="T2">(64/1) </text:span> 0ⲧⲁⲡⲟⲕⲁⲗⲯⲓⲥ ⲛ̅ⲁⲇⲁⲙ <text:line-break/><text:span text:style-name="T1"> </text:span><text:span text:style-name="T2">(64/2) </text:span> ϯⲁⲡⲟⲕⲁⲗⲩⲯⲓⲥ ⲉⲧⲁⲁⲇⲁ[ⲙ ⲧ]ⲁ̣‐ <text:line-break/><text:span text:style-name="T1"> </text:span><text:span text:style-name="T2">(64/3) </text:span> ⲙⲉ ⲡⲉϥϣⲏⲣⲉ ⲥ̅ⲏ̅ⲑ̅ ⲉⲣⲟⲥ̣ ϩⲛ̅ <text:line-break/><text:span text:style-name="T1"> </text:span><text:span text:style-name="T2">(64/4) </text:span> ⲧⲙⲉϩⲯ̅ ⲛ̅ⲣⲟⲙⲡⲉ· ⲉϥϫⲱ ⲙ̅‐ <text:line-break/><text:span text:style-name="T1"> </text:span><text:span text:style-name="T2">(64/5) </text:span> ⲙⲟⲥ ϫⲉ ⲥⲱⲧⲙ̅ ⲉⲛⲁϣⲁϫⲉ ⲡⲁ‐ <text:line-break/><text:span text:style-name="T1"> </text:span><text:span text:style-name="T2">(64/6) </text:span> ϣⲏⲣⲉ ⲥ̅ⲏ̅ⲑ̅· ⲟⲧⲁⲛ ⲛ̅ⲧⲁⲣⲉϥⲧⲁ‐ <text:line-break/><text:span text:style-name="T1"> </text:span><text:span text:style-name="T2">(64/7) </text:span> ⲙⲓⲟⲉⲓ ⲛ̅ϭⲓ ⲡⲛⲟⲩⲧⲉ ⲉⲃⲟⲗ ϩⲙ̅ <text:line-break/><text:span text:style-name="T1"> </text:span><text:span text:style-name="T2">(64/8) </text:span> ⲡⲕⲁϩ ⲙⲛ̅ ⲉⲩϩⲁ ⲧⲉⲕⲙⲁⲁⲩ· <text:line-break/><text:span text:style-name="T1"> </text:span><text:span text:style-name="T2">(64/9) </text:span> ⲛⲉⲓ̈ⲙⲟⲟϣⲉ ⲛⲙ̅ⲙⲁⲥ ⲡⲉ ϩⲛ̅ ⲟⲩⲉ‐ <text:line-break/><text:span text:style-name="T1"> </text:span><text:span text:style-name="T2">(64/10) </text:span> ⲟⲟⲩ ⲉⲧⲁⲥⲛⲁⲩ ⲉⲣⲟϥ· ⲉⲃⲟⲗ ϩⲙ̅ <text:line-break/><text:span text:style-name="T1"> </text:span><text:span text:style-name="T2">(64/11) </text:span> ⲡⲓⲉⲱⲛ ⲉⲛⲧⲁⲛϣⲱⲡⲉ ⲉⲃⲟⲗ <text:line-break/><text:span text:style-name="T1"> </text:span><text:span text:style-name="T2">(64/12) </text:span> ⲛ̅ϩⲏⲧϥ̅· ⲁⲥⲧⲁⲙⲟⲓ̈ ⲉⲩϣⲁϫⲉ <text:line-break/><text:span text:style-name="T1"> </text:span><text:span text:style-name="T2">(64/13) </text:span> ⲛ̅ⲧⲉ ⲟⲩⲅⲛⲱⲥⲓⲥ ⲛ̅ⲧⲉ ⲡⲛⲟⲩⲧⲉ <text:line-break/><text:span text:style-name="T1"> </text:span><text:span text:style-name="T2">(64/14) </text:span> ⲡⲓϣⲁ ⲉⲛⲉϩ· ⲁⲩⲱ ⲛⲉⲛⲉⲓⲛⲉ <text:line-break/><text:span text:style-name="T1"> </text:span><text:span text:style-name="T2">(64/15) </text:span> ⲡⲉ ⲛ̅ⲛ̅ⲛⲟϭ ⲛ̅ⲁⲅ’ⲅⲉⲗⲟⲥ ⲛ̅ϣⲁ <text:line-break/><text:span text:style-name="T1"> </text:span><text:span text:style-name="T2">(64/16) </text:span> ⲉⲛⲉϩ· ⲛⲉⲛϫⲟⲥⲉ ⲅⲁⲣ ⲡⲉ ⲉ‐ <text:line-break/><text:span text:style-name="T1"> </text:span><text:span text:style-name="T2">(64/17) </text:span> ⲡⲛⲟⲩⲧⲉ ⲉⲧⲁϥⲧⲁⲙⲓⲟⲛ ⲙⲛ̅ <text:line-break/><text:span text:style-name="T1"> </text:span><text:span text:style-name="T2">(64/18) </text:span> ⲛⲓϭⲟⲙ ⲉⲧⲛⲙ̅ⲙⲁϥ· ⲛⲏ ⲉⲧⲉ <text:line-break/><text:span text:style-name="T1"> </text:span><text:span text:style-name="T2">(64/19) </text:span> ⲛⲉⲛⲥⲟⲟⲩⲛ ⲙ̅ⲙⲟⲟⲩ ⲁⲛ· <text:line-break/><text:span text:style-name="T1"> </text:span><text:span text:style-name="T2">(64/20) </text:span> ⲧⲟⲧⲉ ⲁϥⲧⲱϣ ⲛⲁⲛ ⲛ̅ϭⲓ ⲡⲛⲟⲩ‐ <text:line-break/><text:span text:style-name="T1"> </text:span><text:span text:style-name="T2">(64/21) </text:span> ⲧⲉ ⲡⲁⲣⲭⲱⲛ ⲛ̅ⲧⲉ ⲛⲉⲱⲛ <text:line-break/><text:span text:style-name="T1"> </text:span><text:span text:style-name="T2">(64/22) </text:span> ⲙⲛ̅ ⲛⲓϭⲟⲙ ϩⲛ̅ ⲟⲩⲃⲱⲗⲕ̅· ⲧⲟ‐ <text:line-break/><text:span text:style-name="T1"> </text:span><text:span text:style-name="T2">(64/23) </text:span> ⲧⲉ ⲁⲛϣⲱⲡⲉ ⲉⲉⲱⲛ ⲥⲛⲁⲩ· <text:line-break/><text:span text:style-name="T1"> </text:span><text:span text:style-name="T2">(64/24) </text:span> ⲁⲩⲱ ⲁϥⲕⲁⲁⲛ ⲛ̅ⲥⲱϥ ⲛ̅ϭⲓ <text:line-break/><text:span text:style-name="T1"> </text:span><text:span text:style-name="T2">(64/25) </text:span> ⲡⲓⲉⲟⲟⲩ ⲉⲧ’ϩⲙ̅ ⲡⲉⲛϩⲏⲧ’ <text:line-break/><text:span text:style-name="T1"> </text:span><text:span text:style-name="T2">(64/26) </text:span> ⲁⲛⲟⲕ ⲙⲛ̅ ⲧⲉⲕⲙⲁⲁⲩ ⲉ̅ⲩ̅ϩ̅ⲁ̅ <text:line-break/><text:span text:style-name="T1"> </text:span><text:span text:style-name="T2">(64/27) </text:span> ⲙⲛ̅ ϯⲅⲛⲱⲥⲓⲥ ⲛ̅ϣⲟⲣⲡ̅’ ⲉ‐ <text:line-break/><text:span text:style-name="T1"> </text:span><text:span text:style-name="T2">(64/28) </text:span> [ⲧ]ⲉ ⲛⲉⲥⲛⲓϥⲉ ⲛ̅ϩⲏⲧⲛ̅· ⲁⲩ[ⲱ] <text:line-break/><text:span text:style-name="T1"> </text:span><text:span text:style-name="T2">(64/29) </text:span> ⲁϥⲡⲱⲧ’ ⲉⲃⲟⲗ ⲙ̅ⲙⲟⲛ <text:line-break/><text:span text:style-name="T1"> </text:span><text:span text:style-name="T2">(64/30) </text:span> [ⲁ]ϥ̣ⲃ̣ⲱ̣ⲕ ⲉϩⲟⲩⲛ [.]ⲉ̣ⲛⲟ̣ϭ̣ <text:line-break/><text:span text:style-name="T1"> </text:span><text:span text:style-name="T2">(64/31) </text:span> [.....] ⲛ[.]ⲙ[ⲛ̅..]ⲉⲛⲟ <text:line-break/><text:span text:style-name="T1"> </text:span><text:span text:style-name="T2">(64/32) </text:span> [...]. ⲉⲁ[.] ⲡ[..ⲉ]ⲧ̣ⲁⲥϣ <text:line-break/><text:span text:style-name="T1"> </text:span><text:span text:style-name="T2">(65/1) </text:span> ⲱ̣[ⲡⲉ ⲉⲃⲟ]ⲗ ϩⲙ̅ ⲡⲉⲓ̈ⲁⲓⲱⲛ ⲁⲛ ⲉⲧ̣[ⲁⲛ]‐ <text:line-break/><text:span text:style-name="T1"> </text:span><text:span text:style-name="T2">(65/2) </text:span> ϣⲱ[ⲡⲉ] ⲉⲃⲟⲗ ⲛ̅ϩⲏⲧϥ̅ ⲁⲛⲟⲕ <text:line-break/><text:span text:style-name="T1"> </text:span><text:span text:style-name="T2">(65/3) </text:span> ⲙⲛ̅ ⲉⲩ̣ϩⲁ ⲧⲉⲕⲙⲁⲁⲩ· ⲁⲗⲗⲁ <text:line-break/><text:span text:style-name="T1"> </text:span><text:span text:style-name="T2">(65/4) </text:span> ⲁⲥⲃⲱⲕ ⲉϩⲟⲩⲛ ⲉⲧ’ⲥⲡⲟⲣⲁ ⲛ̅ⲧⲉ <text:line-break/><text:span text:style-name="T1"> </text:span><text:span text:style-name="T2">(65/5) </text:span> ϩⲉⲛⲛⲟϭ ⲛ̅ⲛⲉⲱⲛ· ⲉⲧⲃⲉ ⲡⲁⲓ̈ <text:line-break/><text:span text:style-name="T1"> </text:span><text:span text:style-name="T2">(65/6) </text:span> ϩⲱ ⲁⲛ̣ⲟⲕ ⲁⲉⲓⲙⲟⲩⲧⲉ ⲉⲣⲟⲕ <text:line-break/><text:span text:style-name="T1"> </text:span><text:span text:style-name="T2">(65/7) </text:span> ⲙ̅ⲡⲣⲁⲛ ⲙ̅ⲡⲣⲱⲙⲉ ⲉⲧⲙ̅ⲙⲁⲩ <text:line-break/><text:span text:style-name="T1"> </text:span><text:span text:style-name="T2">(65/8) </text:span> ⲉⲧⲉ ϯⲥⲡⲟⲣⲁ ⲧⲉ ⲛ̅ϯⲛⲟϭ ⲛ̅ⲅⲉⲛⲉⲁ <text:line-break/><text:span text:style-name="T1"> </text:span><text:span text:style-name="T2">(65/9) </text:span> ⲏ%0 ⲉⲃⲟⲗ ⲛ̅ϩⲏⲧϥ̅· ⲙⲛ̅ⲛ̅ⲥⲁ ⲛⲓϩⲟ‐ <text:line-break/><text:span text:style-name="T1"> </text:span><text:span text:style-name="T2">(65/10) </text:span> ⲟⲩ ⲉⲧⲙ̅ⲙⲁⲩ ⲁⲥⲟⲩⲉ ⲉⲃⲟⲗ <text:line-break/><text:span text:style-name="T1"> </text:span><text:span text:style-name="T2">(65/11) </text:span> ⲙ̅ⲙⲟⲓ̈ ⲁⲛⲟⲕ ⲙⲛ̅ ⲧⲉⲕⲙⲁⲁⲩ <text:line-break/><text:span text:style-name="T1"> </text:span><text:span text:style-name="T2">(65/12) </text:span> ⲉⲩϩⲁ ⲛ̅ϭⲓ ϯⲅⲛⲱⲥⲓⲥ ⲛ̅ϣⲁ ⲉ‐ <text:line-break/><text:span text:style-name="T1"> </text:span><text:span text:style-name="T2">(65/13) </text:span> ⲛⲉϩ ⲛ̅ⲧⲉ ⲡⲛⲟⲩⲧⲉ ⲛ̅ⲧⲉ ⲧⲙⲉ <text:line-break/><text:span text:style-name="T1"> </text:span><text:span text:style-name="T2">(65/14) </text:span> ϫⲓⲛ ⲡⲟⲩⲟⲉⲓϣ ⲉⲧⲙ̅ⲙⲁⲩ ⲁⲛ‐ <text:line-break/><text:span text:style-name="T1"> </text:span><text:span text:style-name="T2">(65/15) </text:span> ϫⲓ ⲥⲃⲱ ⲉϩⲉⲛϩⲃⲏⲩⲉ ⲉⲩⲙⲟ‐ <text:line-break/><text:soft-page-break/><text:span text:style-name="T1"> </text:span><text:span text:style-name="T2">(65/16) </text:span> ⲟⲩⲧ’ ϩⲱⲥ ϩⲉⲛⲣⲱⲙⲉ· ⲧⲟⲧⲉ <text:line-break/><text:span text:style-name="T1"> </text:span><text:span text:style-name="T2">(65/17) </text:span> ⲁⲛⲥⲟⲩⲱⲛ ⲡⲛⲟⲩⲧⲉ ⲉⲧⲁϥ‐ <text:line-break/><text:span text:style-name="T1"> </text:span><text:span text:style-name="T2">(65/18) </text:span> ⲧⲁⲙⲓⲟⲛ· ⲛ̅ⲛⲉⲛⲟ͂ ⲅⲁⲣ ⲁⲛ ⲡⲉ <text:line-break/><text:span text:style-name="T1"> </text:span><text:span text:style-name="T2">(65/19) </text:span> ⲛ̅ϣⲙ̅ⲙⲟ ⲛ̅ⲛⲉϥϭⲟⲙ· ⲁⲩⲱ <text:line-break/><text:span text:style-name="T1"> </text:span><text:span text:style-name="T2">(65/20) </text:span> ⲁⲛϣⲙ̅ϣⲉ ⲙ̅ⲙⲟϥ ϩⲛ̅ ⲟⲩϩⲟ‐ <text:line-break/><text:span text:style-name="T1"> </text:span><text:span text:style-name="T2">(65/21) </text:span> ⲧⲉ ⲙⲛ̅ ⲟⲩⲙⲛ̅ⲧ’ϩⲙ̅ϩⲁⲗ· ⲙⲛ̅‐ <text:line-break/><text:span text:style-name="T1"> </text:span><text:span text:style-name="T2">(65/22) </text:span> ⲛ̅ⲥⲁ ⲛⲁⲓ̈ ⲇⲉ ⲁⲛϣⲱⲡⲉ <text:line-break/><text:span text:style-name="T1"> </text:span><text:span text:style-name="T2">(65/23) </text:span> ⲉⲛⲉ ⲛ̅ⲛⲉⲃⲏ ϩⲙ̅ ⲡⲉⲛϩⲏⲧ’· <text:line-break/><text:span text:style-name="T1"> </text:span><text:span text:style-name="T2">(65/24) </text:span> ⲁⲛⲟⲕ ⲇⲉ ⲛⲉⲓ̈ⲛ̅ⲕⲟⲧ’ ϩⲙ̅ ⲡⲙⲉ <text:line-break/><text:span text:style-name="T1"> </text:span><text:span text:style-name="T2">(65/25) </text:span> ⲉⲩⲉ ⲛ̅ⲧⲉ ⲡⲁϩⲏⲧ’· ⲛⲉⲓ̈‐ <text:line-break/><text:span text:style-name="T1"> </text:span><text:span text:style-name="T2">(65/26) </text:span> ⲛⲁⲩ ⲅⲁⲣ ⲡⲉ ⲉϣⲟⲙⲉⲧ’ <text:line-break/><text:span text:style-name="T1"> </text:span><text:span text:style-name="T2">(65/27) </text:span> ⲛ̅ⲣⲱⲙⲉ ⲙ̅ⲡⲁⲙ̅ⲧⲟ ⲉⲃⲟⲗ <text:line-break/><text:span text:style-name="T1"> </text:span><text:span text:style-name="T2">(65/28) </text:span> ⲛⲏ ⲉⲧⲉ ⲙ̅ⲡⲓϭⲙ̅ϭⲟⲙ ⲉⲥⲟⲩ‐ <text:line-break/><text:span text:style-name="T1"> </text:span><text:span text:style-name="T2">(65/29) </text:span> ⲱⲛ ⲡⲉⲩⲉⲓⲛⲉ· ⲉⲡⲓⲇⲏ ⲛⲉ‐ <text:line-break/><text:span text:style-name="T1"> </text:span><text:span text:style-name="T2">(65/30) </text:span> ϩⲉⲛⲉⲃⲟⲗ ⲁⲛ ⲛⲉ ϩ[ⲛ̅] ⲛⲓϭⲟⲙ <text:line-break/><text:span text:style-name="T1"> </text:span><text:span text:style-name="T2">(65/31) </text:span> ⲛ̣̅ⲧⲉ ⲡⲛ̣ⲟⲩ̣ⲧ̣ⲉ ⲉⲧⲁϥⲧ̣[ⲁⲙⲓ]ⲟ̣ ⲙ̣̅‐ <text:line-break/><text:span text:style-name="T1"> </text:span><text:span text:style-name="T2">(65/32) </text:span> [ⲙⲟⲛ ⲛ]ⲉⲩ[ⲟ]ⲩⲟⲧⲃ̅ ⲉ[ <text:line-break/><text:span text:style-name="T1"> </text:span><text:span text:style-name="T2">(65/33) </text:span> [.....]ⲉⲟⲟ̣ⲩ· ⲁⲩ[ⲱ <text:line-break/><text:span text:style-name="T1"> </text:span><text:span text:style-name="T2">(65/34) </text:span> [.....]ⲛ̣̅ⲣ̣[ⲱ]ⲙⲉ ⲉ[ <text:line-break/><text:span text:style-name="T1"> </text:span><text:span text:style-name="T2">(66/1) </text:span> [ⲉⲩ]ϫ̣ⲱ ⲙ̅ⲙⲟⲥ ⲛⲁⲓ̈ ϫⲉ ⲧ[ⲱⲟⲩ]ⲛ̣ⲅ̅’ <text:line-break/><text:span text:style-name="T1"> </text:span><text:span text:style-name="T2">(66/2) </text:span> ⲙ̅ⲙⲁⲩ ⲁ̅ⲇ̅ⲁ̅ⲙ̅ ⲉⲃⲟⲗ ϩⲙ̅ ⲡⲓⲛ̣̅ⲕⲟⲧ’ <text:line-break/><text:span text:style-name="T1"> </text:span><text:span text:style-name="T2">(66/3) </text:span> ⲛ̅ⲧⲉ ⲡⲙⲟⲩ· ⲁⲩⲱ ⲥⲱⲧⲙ̅ <text:line-break/><text:span text:style-name="T1"> </text:span><text:span text:style-name="T2">(66/4) </text:span> ⲉⲧⲃⲉ ⲡⲓⲉⲱⲛ ⲙⲛ̅ ϯⲥⲡⲟⲣⲁ <text:line-break/><text:span text:style-name="T1"> </text:span><text:span text:style-name="T2">(66/5) </text:span> ⲙ̅ⲡⲓⲣⲱⲙⲉ ⲉⲧⲙ̅ⲙⲁⲩ· ⲡⲏ <text:line-break/><text:span text:style-name="T1"> </text:span><text:span text:style-name="T2">(66/6) </text:span> ⲉⲧⲁⲡⲓⲱⲛϩ̅ ⲡⲱϩ ϣⲁⲣⲟϥ· ⲡⲏ <text:line-break/><text:span text:style-name="T1"> </text:span><text:span text:style-name="T2">(66/7) </text:span> ⲉⲧⲁϥ{ⲉ̅ⲓ} ⲉⲃⲟⲗ ⲛ̅ϩⲏⲧⲕ̅· ⲁⲩⲱ <text:line-break/><text:span text:style-name="T1"> </text:span><text:span text:style-name="T2">(66/8) </text:span> ⲉⲃⲟⲗ ϩⲛ̅ ⲉ̅ⲩ̅ϩ̅ⲁ̅ ⲧⲉⲕⲥⲩⲛⲍⲩⲅⲟⲥ <text:line-break/><text:span text:style-name="T1"> </text:span><text:span text:style-name="T2">(66/9) </text:span> ⲧⲟⲧⲉ ⲛ̅ⲧⲉⲣⲓⲥⲱⲧⲙ̅ ⲉⲛⲉⲓ̈ϣⲁ‐ <text:line-break/><text:span text:style-name="T1"> </text:span><text:span text:style-name="T2">(66/10) </text:span> ϫⲉ ⲛ̅ⲧⲟⲟⲧⲟⲩ ⲛ̅ⲛⲓⲛⲟϭ ⲛ̅ⲣⲱⲙⲉ <text:line-break/><text:span text:style-name="T1"> </text:span><text:span text:style-name="T2">(66/11) </text:span> ⲉⲧⲙ̅ⲙⲁⲩ· ⲛⲏ ⲉⲧⲉ ⲛⲉⲩⲁϩⲉⲣⲁ‐ <text:line-break/><text:span text:style-name="T1"> </text:span><text:span text:style-name="T2">(66/12) </text:span> ⲧⲟⲩ ⲛ̅ⲛⲁϩⲣⲁⲓ̈· ⲧⲟⲧⲉ ⲁⲛϥⲓ ⲁ‐ <text:line-break/><text:span text:style-name="T1"> </text:span><text:span text:style-name="T2">(66/13) </text:span> ϩⲟⲙ ⲁⲛⲟⲕ ⲙⲛ̅ ⲉ̅ⲩ̅ϩ̅ⲁ̅ ϩⲣⲁⲓ̈ ϩⲙ̅ <text:line-break/><text:span text:style-name="T1"> </text:span><text:span text:style-name="T2">(66/14) </text:span> ⲡⲉⲛϩⲏⲧ’· ⲁⲩⲱ ⲁⲡϫⲟⲉⲓⲥ ⲡⲛⲟⲩ‐ <text:line-break/><text:span text:style-name="T1"> </text:span><text:span text:style-name="T2">(66/15) </text:span> ⲧⲉ ⲉⲧⲁϥⲧⲁⲙⲓⲟⲛ ⲁϥⲁϩⲉⲣⲁⲧϥ̅ <text:line-break/><text:span text:style-name="T1"> </text:span><text:span text:style-name="T2">(66/16) </text:span> ⲙ̅ⲡⲉⲛⲙ̅ⲧⲟ ⲉⲃⲟⲗ· ⲡⲉϫⲁϥ ⲛⲁⲛ <text:line-break/><text:span text:style-name="T1"> </text:span><text:span text:style-name="T2">(66/17) </text:span> ϫⲉ ⲁ̅ⲇ̅ⲁ̅ⲙ̅ ⲉⲧⲃⲉ ⲟⲩ ⲛⲉⲧⲉⲧⲛ̅‐ <text:line-break/><text:span text:style-name="T1"> </text:span><text:span text:style-name="T2">(66/18) </text:span> ϥⲓ ⲁϩⲟⲙ ϩⲙ̅ ⲡⲉⲧⲛ̅ϩⲏⲧ’· {ϩ̅ⲓ}ⲉ <text:line-break/><text:span text:style-name="T1"> </text:span><text:span text:style-name="T2">(66/19) </text:span> ⲛ̅ⲧⲉⲧⲛ̅ⲥⲟⲟⲩⲛ ⲁⲛ ϫⲉ ⲁⲛⲟⲕ <text:line-break/><text:span text:style-name="T1"> </text:span><text:span text:style-name="T2">(66/20) </text:span> ⲡⲉ ⲡⲛⲟⲩⲧⲉ ⲉⲧⲁϥⲧⲁⲙⲓⲉ <text:line-break/><text:span text:style-name="T1"> </text:span><text:span text:style-name="T2">(66/21) </text:span> ⲧⲏⲩⲧⲛ̅· ⲁⲩⲱ ⲁⲓ̈ⲛⲓϥⲉ ⲉϩⲟⲩⲛ <text:line-break/><text:span text:style-name="T1"> </text:span><text:span text:style-name="T2">(66/22) </text:span> ⲉⲣⲱⲧⲛ̅ ⲛ̅ⲟⲩⲡ̅ⲛ̅ⲁ̅ ⲛ̅ⲧⲉ ⲡⲱⲛϩ̅ <text:line-break/><text:span text:style-name="T1"> </text:span><text:span text:style-name="T2">(66/23) </text:span> ⲉϩⲣⲁⲓ̈ ⲉⲩⲯⲩⲭⲏ ⲉⲥⲟⲛϩ̅· ⲧⲟ‐ <text:line-break/><text:span text:style-name="T1"> </text:span><text:span text:style-name="T2">(66/24) </text:span> ⲧⲉ ⲁⲩⲕⲁⲕⲉ ϣⲱⲡⲉ {ϩ̅ⲓ}ϫⲛ̅ ⲛⲉⲛ‐ <text:line-break/><text:span text:style-name="T1"> </text:span><text:span text:style-name="T2">(66/25) </text:span> ⲃ̣ⲁ̣ⲗ· ⲧⲟⲧⲉ ⲁⲡⲛⲟⲩⲧⲉ ⲉⲧⲁϥ̣‐ <text:line-break/><text:span text:style-name="T1"> </text:span><text:span text:style-name="T2">(66/26) </text:span> ⲧ̣ⲁ̣ⲙⲓⲟⲛ ⲁϥⲧⲁⲙⲓⲟ ⲛ̅ⲛⲟⲩ‐ <text:line-break/><text:span text:style-name="T1"> </text:span><text:span text:style-name="T2">(66/27) </text:span> ϣ̣ⲏⲣⲉ ⲉⲃⲟⲗ ⲛ̅ϩ̣ⲏ̣ⲧϥ̅ [ⲙ]ⲛ̣̅ ⲉ̣[ⲩ]‐ <text:line-break/><text:span text:style-name="T1"> </text:span><text:span text:style-name="T2">(66/28) </text:span> ϩ̣ⲁ̣ ⲧ̣ⲉ̣[ⲕ]ⲙ̣ⲁ[ⲁ]ⲩ ⲉ̣ⲡ̣ⲉ[.] ⲃ̣ⲁ[ <text:line-break/><text:soft-page-break/><text:span text:style-name="T1"> </text:span><text:span text:style-name="T2">(66/29) </text:span> [...]ⲕⲥ ⲁⲛ̣.[ <text:line-break/><text:span text:style-name="T1"> </text:span><text:span text:style-name="T2">(66/30) </text:span> [...]ⲉⲕⲉ.[..].[ <text:line-break/><text:span text:style-name="T1"> </text:span><text:span text:style-name="T2">(66/31) </text:span> [...]ⲗ ϩⲙ̅ ⲡ̣ⲉ̣[ <text:line-break/><text:span text:style-name="T1"> </text:span><text:span text:style-name="T2">(67/1) </text:span> ⲧ̣[...ϩⲙ̅] ⲡ̣ⲙ̣ⲉⲉⲩⲉ̣ [ⲛ̅ⲧ]ⲉ̣ <text:line-break/><text:span text:style-name="T1"> </text:span><text:span text:style-name="T2">(67/2) </text:span> ⲡⲁϣ̣[.]ⲓ̣· ⲁⲓ̈ⲥⲟⲩⲱ̣ⲛ̣ <text:line-break/><text:span text:style-name="T1"> </text:span><text:span text:style-name="T2">(67/3) </text:span> ⲟⲩⲉⲡⲓⲑⲩⲙⲓⲁ ⲉⲥϩⲟⲗϭ̅ <text:line-break/><text:span text:style-name="T1"> </text:span><text:span text:style-name="T2">(67/4) </text:span> ⲛ̅ⲧⲉ ⲧⲉⲕⲙⲁⲁⲩ· ⲧⲟ‐ <text:line-break/><text:span text:style-name="T1"> </text:span><text:span text:style-name="T2">(67/5) </text:span> ⲧⲉ ⲁⲥⲧⲁⲕⲟ ⲉⲃⲟⲗ ⲛ̅ϩⲏ‐ <text:line-break/><text:span text:style-name="T1"> </text:span><text:span text:style-name="T2">(67/6) </text:span> ⲧⲛ̅ ⲛ̅ϭⲓ ⲧⲁⲕⲙⲏ ⲛ̅ⲧⲉ <text:line-break/><text:span text:style-name="T1"> </text:span><text:span text:style-name="T2">(67/7) </text:span> ⲡⲉⲛⲥⲟⲟⲩⲛ ⲛ̅ϣⲁ ⲉ‐ <text:line-break/><text:span text:style-name="T1"> </text:span><text:span text:style-name="T2">(67/8) </text:span> ⲛⲉϩ· ⲁⲩⲱ ⲁⲥⲣ̅ⲇⲓⲱⲕⲉ <text:line-break/><text:span text:style-name="T1"> </text:span><text:span text:style-name="T2">(67/9) </text:span> ⲛ̅ⲥⲱⲛ ⲛ̅ϭⲓ ⲟⲩⲙⲛ̅ⲧ’ϭⲱⲃ <text:line-break/><text:span text:style-name="T1"> </text:span><text:span text:style-name="T2">(67/10) </text:span> ⲉⲧⲃⲉ ⲡⲁⲓ̈ ⲁⲩⲣ̅ ⲕⲟⲩⲉⲓ <text:line-break/><text:span text:style-name="T1"> </text:span><text:span text:style-name="T2">(67/11) </text:span> ⲛ̅ϭⲓ ⲛⲉϩⲟⲟⲩ ⲛ̅ⲧⲉ ⲡⲉⲛ‐ <text:line-break/><text:span text:style-name="T1"> </text:span><text:span text:style-name="T2">(67/12) </text:span> ⲱⲛϩ̅· ⲁⲓ̈ⲉⲓⲙⲉ ⲅⲁⲣ ϫⲉ ⲁⲓ̈‐ <text:line-break/><text:span text:style-name="T1"> </text:span><text:span text:style-name="T2">(67/13) </text:span> ϣⲱⲡⲉ ϩⲁ ⲧⲉⲝⲟⲩⲥⲓⲁ <text:line-break/><text:span text:style-name="T1"> </text:span><text:span text:style-name="T2">(67/14) </text:span> ⲛ̅ⲧⲉ ⲡⲙⲟⲩ· ϯⲛⲟⲩ ϭⲉ <text:line-break/><text:span text:style-name="T1"> </text:span><text:span text:style-name="T2">(67/15) </text:span> ⲡⲁϣⲏⲣⲉ ⲥ̅ⲏ̅ⲑ̅ ϯⲛⲁ‐ <text:line-break/><text:span text:style-name="T1"> </text:span><text:span text:style-name="T2">(67/16) </text:span> ϭⲱⲗⲡ̅’ ⲛⲁⲕ ⲉⲃⲟⲗ ⲛ̅ⲛⲁⲓ̈ <text:line-break/><text:span text:style-name="T1"> </text:span><text:span text:style-name="T2">(67/17) </text:span> ⲉⲧⲁⲩϭⲟⲗⲡⲟⲩ ⲛⲁⲓ̈ ⲉ‐ <text:line-break/><text:span text:style-name="T1"> </text:span><text:span text:style-name="T2">(67/18) </text:span> ⲃⲟⲗ· ϫⲉ ⲛⲓⲣⲱⲙⲉ ⲉⲧⲙ̅‐ <text:line-break/><text:span text:style-name="T1"> </text:span><text:span text:style-name="T2">(67/19) </text:span> ⲙⲁⲩ ⲛⲏ ⲉⲧⲁⲓ̈ⲛⲁⲩ <text:line-break/><text:span text:style-name="T1"> </text:span><text:span text:style-name="T2">(67/20) </text:span> ⲉⲣⲟⲟⲩ ⲛ̅ϣⲟⲣⲡ̅’ ⲙ̅‐ <text:line-break/><text:span text:style-name="T1"> </text:span><text:span text:style-name="T2">(67/21) </text:span> ⲡⲁⲙ̅ⲧⲟ ⲉⲃⲟⲗ· ϫⲉ <text:line-break/><text:span text:style-name="T1"> </text:span><text:span text:style-name="T2">(67/22) </text:span> ⲙ̅ⲙⲛ̅ⲛ̅ⲥⲁ ⲧⲣⲁϫⲱⲕ <text:line-break/><text:span text:style-name="T1"> </text:span><text:span text:style-name="T2">(67/23) </text:span> ⲉⲃⲟⲗ ⲛ̅ⲛⲓⲟⲩⲟⲉⲓϣ <text:line-break/><text:span text:style-name="T1"> </text:span><text:span text:style-name="T2">(67/24) </text:span> ⲛ̅ⲧⲉ ⲧⲉⲓ̈ⲅⲉⲛⲉⲁ· <text:line-break/><text:span text:style-name="T1"> </text:span><text:span text:style-name="T2">(67/25) </text:span> ⲁⲩⲱ ⲛ̅ⲥⲉⲙⲟⲩⲛⲅ̅’ <text:line-break/><text:span text:style-name="T1"> </text:span><text:span text:style-name="T2">(67/26) </text:span> [ⲛ̅ϭⲓ ⲛⲓ]ⲣⲟⲙⲡⲉ ⲛ̅ⲧⲉ <text:line-break/><text:span text:style-name="T1"> </text:span><text:span text:style-name="T2">(67/27) </text:span> [ϯⲅⲉⲛⲉ]ⲁ· [ⲧⲟ]ⲧⲉ <text:line-break/><text:span text:style-name="T1"> </text:span><text:span text:style-name="T2">(67/28) </text:span> [.....]ⲟ̣[..ϩ]ⲙ̅ϩⲁⲗ <text:line-break/><text:span text:style-name="T1"> </text:span><text:span text:style-name="T2">(67/29) </text:span> [ 8+- ]ⲧ̣ⲁ̣ <text:line-break/><text:span text:style-name="T1"> </text:span><text:span text:style-name="T2">(67/30) </text:span> [ <text:line-break/><text:span text:style-name="T1"> </text:span><text:span text:style-name="T2">(67/31) </text:span> (page 68 blank) <text:line-break/><text:span text:style-name="T1"> </text:span><text:span text:style-name="T2">(69/1) </text:span> (line 1 lacking) <text:line-break/><text:span text:style-name="T1"> </text:span><text:span text:style-name="T2">(69/2) </text:span> ⲥ̣ⲉⲛⲁ̣[ⲟ]ⲩ̣ⲟ̣ⲧ̣ⲛⲟ[ⲩ ⲉⲃⲟ]ⲗ̣ <text:line-break/><text:span text:style-name="T1"> </text:span><text:span text:style-name="T2">(69/3) </text:span> ⲅⲁⲣ ⲛ̅[ϭ]ⲓ ϩⲉⲛⲙⲟⲩ̣[ⲓ̈ⲉⲩ]ⲉ <text:line-break/><text:span text:style-name="T1"> </text:span><text:span text:style-name="T2">(69/4) </text:span> ⲛ̅ϩⲱⲟⲩ ⲛ̅ⲧⲉ ⲡ̣[ⲛⲟⲩⲧ]ⲉ̣ ⲡ̅’‐ <text:line-break/><text:span text:style-name="T1"> </text:span><text:span text:style-name="T2">(69/5) </text:span> ⲡⲁⲛⲧⲟⲕⲣⲁ[ⲧⲱⲣ· ϫⲉ] ⲉ̣ϥ̣ⲉ‐ <text:line-break/><text:span text:style-name="T1"> </text:span><text:span text:style-name="T2">(69/6) </text:span> ⲧⲁⲕⲟ ⲛ̅ⲥⲁⲣⲁⲝ [ⲛⲓⲙ] {ⲛ̅ⲧⲉ <text:line-break/><text:span text:style-name="T1"> </text:span><text:span text:style-name="T2">(69/7) </text:span> ⲡⲛⲟⲩⲧⲉ ⲡⲁ[ⲛⲧⲟ]ⲕⲣⲁ‐ <text:line-break/><text:span text:style-name="T1"> </text:span><text:span text:style-name="T2">(69/8) </text:span> ⲧⲱⲣ· ϫⲉ ⲉϥⲉⲧ̣[ⲁⲕ]ⲉ ⲥⲁ‐ <text:line-break/><text:span text:style-name="T1"> </text:span><text:span text:style-name="T2">(69/9) </text:span> ⲣⲁⲝ ⲛⲓⲙ} ⲉⲃⲟⲗ [ϩⲙ̅] ⲡⲕⲁϩ <text:line-break/><text:span text:style-name="T1"> </text:span><text:span text:style-name="T2">(69/10) </text:span> ⲉⲃⲟⲗ {ϩ̅ⲓ}ⲧⲛ̅ ⲛⲏ ⲉ̣ⲧⲉ̣ⲥ̣ⲕⲱ‐ <text:line-break/><text:span text:style-name="T1"> </text:span><text:span text:style-name="T2">(69/11) </text:span> ⲧⲉ ⲛ̅ⲥⲱⲟⲩ· {ϩ̅ⲓ̣̅} ⲛ̣[ⲓⲉⲃ]ⲟⲗ <text:line-break/><text:span text:style-name="T1"> </text:span><text:span text:style-name="T2">(69/12) </text:span> ϩⲛ̅ ϯⲥⲡⲟⲣⲁ ⲛ̣̅[ⲧⲉ] ⲛⲓⲣⲱ‐ <text:line-break/><text:span text:style-name="T1"> </text:span><text:span text:style-name="T2">(69/13) </text:span> ⲙⲉ· ⲛⲏ ⲉⲧⲁ̣[ϥⲟⲩ]ⲱ̣ⲧⲃ̅ ⲉ‐ <text:line-break/><text:soft-page-break/><text:span text:style-name="T1"> </text:span><text:span text:style-name="T2">(69/14) </text:span> ϩⲣⲁⲓ̈ ⲉⲣⲟⲟⲩ [ⲛ̅ϭⲓ ⲡⲓ]ⲱⲛϩ̅ ⲛ̅‐ <text:line-break/><text:span text:style-name="T1"> </text:span><text:span text:style-name="T2">(69/15) </text:span> ⲧⲉ ϯⲅⲛⲱⲥⲓⲥ [ⲡⲁ]ⲉ̣ⲓ̣ ⲉⲧⲁϥ‐ <text:line-break/><text:span text:style-name="T1"> </text:span><text:span text:style-name="T2">(69/16) </text:span> {ⲉ̅ⲓ} ⲉⲃⲟⲗ ⲛ̅ϩⲏⲧ’ ⲙ̣[ⲛ̅] ⲉⲩϩⲁ <text:line-break/><text:span text:style-name="T1"> </text:span><text:span text:style-name="T2">(69/17) </text:span> ⲧⲉⲕⲙⲁⲁⲩ· ⲛⲉ̣ⲩ̣ⲉ ⲅⲁⲣ <text:line-break/><text:span text:style-name="T1"> </text:span><text:span text:style-name="T2">(69/18) </text:span> ⲛ̅ϣⲙ̅ⲙⲟ ⲙ̅ⲙⲟϥ ⲡⲉ· <text:line-break/><text:span text:style-name="T1"> </text:span><text:span text:style-name="T2">(69/19) </text:span> ⲙⲛ̅ⲛ̅ⲥⲁ ⲛⲁⲓ̈ ⲥⲉ̣ⲛ̅ⲛⲏⲟⲩ ⲛ̅‐ <text:line-break/><text:span text:style-name="T1"> </text:span><text:span text:style-name="T2">(69/20) </text:span> ϭⲓ ϩⲉⲛⲛⲟϭ ⲛ̅ⲁⲅ’̣ⲅ̣ⲉⲗⲟⲥ <text:line-break/><text:span text:style-name="T1"> </text:span><text:span text:style-name="T2">(69/21) </text:span> ϩⲛ̅ ϩⲉⲛⲕⲗⲟⲟⲗⲉ̣ ⲉⲩϫⲟⲥⲉ <text:line-break/><text:span text:style-name="T1"> </text:span><text:span text:style-name="T2">(69/22) </text:span> ⲉⲩⲛⲁϫⲓ ⲛ̅ⲛⲓⲣⲱⲙⲉ ⲉⲧⲙ̅‐ <text:line-break/><text:span text:style-name="T1"> </text:span><text:span text:style-name="T2">(69/23) </text:span> ⲙⲁⲩ ⲉϩⲟⲩⲛ ⲉⲡ̣ⲧⲟⲡⲟⲥ ⲉⲧⲉ̣ϥ̣‐ <text:line-break/><text:span text:style-name="T1"> </text:span><text:span text:style-name="T2">(69/24) </text:span> ϣⲟⲟⲡ’ ⲛ̅ϩⲏⲧ[ϥ̅] ⲛ̅ϭⲓ ⲡⲉⲡⲛ̅[̅ⲁ̅]̅ <text:line-break/><text:span text:style-name="T1"> </text:span><text:span text:style-name="T2">(69/25) </text:span> [ⲛ̅ⲧⲉ ⲡ]ⲱⲛϩ̅ ⲛ̣̅[ <text:line-break/><text:span text:style-name="T1"> </text:span><text:span text:style-name="T2">(69/26) </text:span> (4+- lines lacking) <text:line-break/><text:span text:style-name="T1"> </text:span><text:span text:style-name="T2">(70/1) </text:span> [ 9+- ]ⲏⲧ ⲉ[.]ⲛ[..] ⲛ̅ⲉⲟ‐ <text:line-break/><text:span text:style-name="T1"> </text:span><text:span text:style-name="T2">(70/2) </text:span> [ⲟⲩ .]ⲧ̣ⲉ̣[....]ⲛ ⲉⲧⲙ̅ⲙⲁ̣ⲩ· <text:line-break/><text:span text:style-name="T1"> </text:span><text:span text:style-name="T2">(70/3) </text:span> [..]ⲧ̣ⲉ [...ϣ]ⲱ̣ⲡⲉ ϫⲓⲛ ⲧⲡⲉ <text:line-break/><text:span text:style-name="T1"> </text:span><text:span text:style-name="T2">(70/4) </text:span> ϣⲁ ⲡⲕ[ⲁϩ· ⲧⲟⲧⲉ] ϥⲛⲁϣⲱϫⲡ̅’ <text:line-break/><text:span text:style-name="T1"> </text:span><text:span text:style-name="T2">(70/5) </text:span> ⲛ̅ϭⲓ ⲡⲓ[ⲙⲏⲏϣⲉ ⲧ]ⲏ̣ⲣϥ̅ ⲛ̅ⲧⲉ ⲧⲥⲁ‐ <text:line-break/><text:span text:style-name="T1"> </text:span><text:span text:style-name="T2">(70/6) </text:span> ⲣⲁⲝ {ϩ̅ⲓ} ⲛ̣[ⲓⲙⲟⲟⲩ·] ⲧⲟⲧⲉ ⲡⲛⲟⲩ‐ <text:line-break/><text:span text:style-name="T1"> </text:span><text:span text:style-name="T2">(70/7) </text:span> ⲧⲉ ⲛⲁⲙ̅[ⲧ]ⲟ̣ⲛ̣ ⲙ̅ⲙⲟϥ ⲉⲃⲟⲗ ⲙ̅‐ <text:line-break/><text:span text:style-name="T1"> </text:span><text:span text:style-name="T2">(70/8) </text:span> ⲡⲉϥϭⲱ[ⲛ]ⲧ̅’· [ⲁ]ⲩⲱ ϥⲛⲉⲛⲟⲩ‐ <text:line-break/><text:span text:style-name="T1"> </text:span><text:span text:style-name="T2">(70/9) </text:span> ϫⲉ ⲛ̅ⲧⲉϥ̣[ϭ]ⲟⲙ ⲉϫⲛ̅ ⲛⲓⲙⲟⲟⲩ· <text:line-break/><text:span text:style-name="T1"> </text:span><text:span text:style-name="T2">(70/10) </text:span> ⲁⲩⲱ [ϥⲛⲁ]ϯ [ϭ]ⲟⲙ ⲛ̅ⲛⲉϥϣⲏⲣⲉ <text:line-break/><text:span text:style-name="T1"> </text:span><text:span text:style-name="T2">(70/11) </text:span> ⲙⲛ̅ ⲛⲉ[ⲩ{ϩ̅ⲓ}]ⲟ[ⲙ]ⲉ ⲉⲃⲟⲗ ϩⲛ̅ ϯⲕⲓ‐ <text:line-break/><text:span text:style-name="T1"> </text:span><text:span text:style-name="T2">(70/12) </text:span> ⲃⲱⲧⲟⲥ· ⲙ̣ⲛ̣̅ [ⲛⲓ]ⲧⲃ̅ⲛⲟⲟⲩⲉ ⲉ‐ <text:line-break/><text:span text:style-name="T1"> </text:span><text:span text:style-name="T2">(70/13) </text:span> ⲧⲁϥϯ ⲙⲉⲧⲉ ⲉϫⲱⲟⲩ· ⲙⲛ̅ ⲛ̅‐ <text:line-break/><text:span text:style-name="T1"> </text:span><text:span text:style-name="T2">(70/14) </text:span> ϩⲁⲗⲁⲧⲉ ⲛ̅ⲧ[ⲉ] ⲧⲡⲉ ⲉⲧⲁϥⲙⲟⲩ‐ <text:line-break/><text:span text:style-name="T1"> </text:span><text:span text:style-name="T2">(70/15) </text:span> ⲧⲉ ⲉⲣⲟⲟⲩ· ⲁϥⲕⲁⲁⲩ {ϩ̅ⲓ}‐ <text:line-break/><text:span text:style-name="T1"> </text:span><text:span text:style-name="T2">(70/16) </text:span> ϫⲙ̅ ⲡⲕⲁ[ϩ·] ⲁⲩⲱ ⲡⲛⲟⲩ‐ <text:line-break/><text:span text:style-name="T1"> </text:span><text:span text:style-name="T2">(70/17) </text:span> ⲧⲉ ⲛⲁϫⲟⲟ̣ⲥ ⲛ̅ⲛⲱϩⲉ· ⲡⲏ ⲉ‐ <text:line-break/><text:span text:style-name="T1"> </text:span><text:span text:style-name="T2">(70/18) </text:span> ⲧⲉ ⲛⲓⲅⲉⲛⲉⲁ ⲛⲁⲙⲟⲩⲧⲉ ⲉⲣⲟϥ <text:line-break/><text:span text:style-name="T1"> </text:span><text:span text:style-name="T2">(70/19) </text:span> ϫⲉ ⲇ̅ⲉ̅ⲩ̅ⲕ̅ⲁ̣̅̅ⲗ̅ⲓ̅ⲱ̅ⲛ̅· ϫⲉ ⲉⲓⲥ ϩⲏ‐ <text:line-break/><text:span text:style-name="T1"> </text:span><text:span text:style-name="T2">(70/20) </text:span> ⲏⲧⲉ ⲁⲓ̈ⲁⲣⲉϩ̣ ⲉⲣⲟ〈ⲕ〉 ϩⲛ̅ ϯⲕⲓⲃⲱⲧⲟⲥ <text:line-break/><text:span text:style-name="T1"> </text:span><text:span text:style-name="T2">(70/21) </text:span> ⲙⲛ̅ ⲧⲉⲕⲥ{ϩ̣̅̅ⲓ}ⲙⲉ ⲙⲛ̅ ⲛⲉⲕϣⲏ‐ <text:line-break/><text:span text:style-name="T1"> </text:span><text:span text:style-name="T2">(70/22) </text:span> ⲣⲉ ⲙⲛ̅ ⲛⲉⲩ{ϩ̅ⲓ}ⲟⲙⲉ· ⲙⲛ̅ ⲛⲉⲩ‐ <text:line-break/><text:span text:style-name="T1"> </text:span><text:span text:style-name="T2">(70/23) </text:span> [ⲧⲃ̅]ⲛⲟⲟⲩⲉ [ⲙ]ⲛ̅ ⲛ̅ϩⲁⲗⲁⲧⲉ̣ [ⲛ̅]ⲧ̣[ⲉ] <text:line-break/><text:span text:style-name="T1"> </text:span><text:span text:style-name="T2">(70/24) </text:span> [ⲧⲡⲉ ⲛ]ⲏ̣ ⲉⲧ̣ⲁⲕ̣ⲙⲟ̣ⲩ[ⲧⲉ ⲉⲣⲟ]‐ <text:line-break/><text:span text:style-name="T1"> </text:span><text:span text:style-name="T2">(70/25) </text:span> [ⲟⲩ· ⲁⲕⲕⲁ]ⲁ̣[ⲩ] {ϩ̅[̅ⲓ}ϫⲙ̅ ⲡⲕⲁϩ] <text:line-break/><text:span text:style-name="T1"> </text:span><text:span text:style-name="T2">(70/26) </text:span> (4+- lines lacking) <text:line-break/><text:span text:style-name="T1"> </text:span><text:span text:style-name="T2">(71/1) </text:span> ⲉⲧⲃⲉ [ⲡ]ⲁ̣ⲓ̣̈ ϯⲛⲁϯ ⲙ̅ⲡⲕ̣[ⲁϩ ⲛ]ⲁⲕ̣ <text:line-break/><text:span text:style-name="T1"> </text:span><text:span text:style-name="T2">(71/2) </text:span> ⲛ̅ⲧⲟⲕ ⲙⲛ̅ ⲛⲉⲕϣⲏⲣⲉ [ϩ]ⲛ̅ ⲟⲩ̣‐ <text:line-break/><text:span text:style-name="T1"> </text:span><text:span text:style-name="T2">(71/3) </text:span> ⲙⲛ̅ⲧⲣ̅ⲣ̣ⲟ ⲕⲛⲁⲣ̅ ⲣ̅ⲣⲟ ⲉϫⲱ̣ϥ ⲛ̅ⲧⲟⲕ <text:line-break/><text:span text:style-name="T1"> </text:span><text:span text:style-name="T2">(71/4) </text:span> ⲙⲛ̅ ⲛⲉⲕϣⲏⲣⲉ· ⲁⲩⲱ ⲙ̅ⲙⲛ̅ <text:line-break/><text:span text:style-name="T1"> </text:span><text:span text:style-name="T2">(71/5) </text:span> ⲥⲡⲟⲣⲁ ⲛ̅ⲛⲏⲩ ⲉⲃⲟⲗ ⲛ̅ϩⲏⲧⲕ̅ <text:line-break/><text:span text:style-name="T1"> </text:span><text:span text:style-name="T2">(71/6) </text:span> ⲛ̅ⲧⲉ ⲛⲓⲣⲱⲙⲉ ⲉⲧⲉ ⲛ̅ⲥⲉⲛⲁⲁϩⲉ‐ <text:line-break/><text:span text:style-name="T1"> </text:span><text:span text:style-name="T2">(71/7) </text:span> ⲣⲁⲧⲟⲩ ⲁⲛ ⲙ̅ⲡⲁⲙ̅ⲧⲟ ⲉⲃⲟⲗ ϩⲛ̅ <text:line-break/><text:span text:style-name="T1"> </text:span><text:span text:style-name="T2">(71/8) </text:span> ⲕⲉⲉⲟⲟⲩ· ⲧⲟⲧⲉ ⲥⲉⲛⲁϣⲱ‐ <text:line-break/><text:soft-page-break/><text:span text:style-name="T1"> </text:span><text:span text:style-name="T2">(71/9) </text:span> ⲡⲉ ⲛ̅ⲑⲉ ⲛ̅ϯⲕⲗⲟⲟⲗⲉ ⲛ̅ⲧⲉ ⲡⲓ‐ <text:line-break/><text:span text:style-name="T1"> </text:span><text:span text:style-name="T2">(71/10) </text:span> ⲛⲟϭ ⲛ̅ⲟⲩⲟⲉⲓⲛ· ⲥⲉⲛ̅ⲛⲏⲩ ⲛ̅ϭⲓ <text:line-break/><text:span text:style-name="T1"> </text:span><text:span text:style-name="T2">(71/11) </text:span> ⲛ̅ⲣⲱⲙⲉ ⲉⲧⲙ̅ⲙⲁⲩ· ⲛⲏ ⲉⲧⲁⲩ‐ <text:line-break/><text:span text:style-name="T1"> </text:span><text:span text:style-name="T2">(71/12) </text:span> ⲛⲟϫⲟⲩ ⲉⲃⲟⲗ ϩⲛ̅ ϯⲅⲛⲱⲥⲓⲥ ⲛ̅‐ <text:line-break/><text:span text:style-name="T1"> </text:span><text:span text:style-name="T2">(71/13) </text:span> ⲧⲉ ⲛⲓⲛⲟϭ ⲛ̅ⲛⲉⲱⲛ ⲙⲛ̅ ⲛⲓⲁⲅ’‐ <text:line-break/><text:span text:style-name="T1"> </text:span><text:span text:style-name="T2">(71/14) </text:span> ⲅⲉⲗⲟⲥ ⲥⲉⲛⲁⲁϩⲉⲣⲁⲧⲟⲩ ⲙ̅‐ <text:line-break/><text:span text:style-name="T1"> </text:span><text:span text:style-name="T2">(71/15) </text:span> ⲡⲉⲙⲧⲟ ⲛ̅ⲛⲱϩⲉ ⲙⲛ̅ ⲛⲓⲉⲱⲛ· <text:line-break/><text:span text:style-name="T1"> </text:span><text:span text:style-name="T2">(71/16) </text:span> ⲁⲩⲱ ⲡⲛⲟⲩⲧⲉ ⲛⲁϫⲟⲟⲥ ⲛ̅‐ <text:line-break/><text:span text:style-name="T1"> </text:span><text:span text:style-name="T2">(71/17) </text:span> ⲛⲱϩⲉ ϫⲉ ⲉⲧⲃⲉ ⲟⲩ ⲁⲕⲣ̅ ⲥⲁⲃⲟⲗ <text:line-break/><text:span text:style-name="T1"> </text:span><text:span text:style-name="T2">(71/18) </text:span> ⲛ̅ⲡⲉⲛⲧⲁⲓ̈ϫⲟⲟϥ ⲛⲁⲕ· ⲁⲕ‐ <text:line-break/><text:span text:style-name="T1"> </text:span><text:span text:style-name="T2">(71/19) </text:span> ⲧⲁⲙⲓⲟ ⲛ̅ⲅⲉⲅⲉⲛⲉⲁ ϫⲉ ⲉⲕⲉ‐ <text:line-break/><text:span text:style-name="T1"> </text:span><text:span text:style-name="T2">(71/20) </text:span> ϯ ⲥⲱϣ ⲛ̅ⲧⲁϭⲟⲙ· ⲧⲟⲧⲉ ϥⲛⲁ‐ <text:line-break/><text:span text:style-name="T1"> </text:span><text:span text:style-name="T2">(71/21) </text:span> ϫⲟⲟⲥ ⲛ̅ϭⲓ ⲛⲱϩⲉ ϫⲉ ϯⲛⲁ‐ <text:line-break/><text:span text:style-name="T1"> </text:span><text:span text:style-name="T2">(71/22) </text:span> ⲣ̅ ⲙⲛ̅ⲧⲣⲉ ⲙ̅ⲡⲉⲙⲧⲟ ⲙ̅ⲡⲉⲕ‐ <text:line-break/><text:span text:style-name="T1"> </text:span><text:span text:style-name="T2">(71/23) </text:span> ϫⲛⲁϩ· ϫⲉ ⲛ̅ⲧⲁⲧⲅⲉⲛⲉⲁ ⲛ̅‐ <text:line-break/><text:span text:style-name="T1"> </text:span><text:span text:style-name="T2">(71/24) </text:span> ⲧⲉ ⲛⲓⲣⲱⲙⲉ ϣⲱⲡⲉ ⲉⲃⲟ̣ⲗ̣ <text:line-break/><text:span text:style-name="T1"> </text:span><text:span text:style-name="T2">(71/25) </text:span> [{ϩ̅ⲓ}ⲧⲟⲟ]ⲧ’ ⲁⲛ· ⲟⲩⲧⲉ ⲉⲃ̣[ⲟⲗ {ϩⲓ}]‐ <text:line-break/><text:span text:style-name="T1"> </text:span><text:span text:style-name="T2">(71/26) </text:span> [ⲧⲛ̅ ⲛⲁ]ϣ̣[ⲏⲣ]ⲉ [ⲁ]ⲛ̣· [ <text:line-break/><text:span text:style-name="T1"> </text:span><text:span text:style-name="T2">(71/27) </text:span> [...]ⲱ̣ⲡ̣ [....]ⲛ̣̅ [ <text:line-break/><text:span text:style-name="T1"> </text:span><text:span text:style-name="T2">(71/28) </text:span> (4+- lines lacking) <text:line-break/><text:span text:style-name="T1"> </text:span><text:span text:style-name="T2">(72/1) </text:span> [...ϯⲅⲛ]ⲱⲥⲓⲥ· [ⲁ]ⲩ[ⲱ ϥ]ⲛ̣ⲁ <text:line-break/><text:span text:style-name="T1"> </text:span><text:span text:style-name="T2">(72/2) </text:span> [.]ⲱ̣[..]ⲗ ⲛ̅ⲛ̅ⲣⲱⲙⲉ ⲉⲧⲙ̅ⲙⲁⲩ <text:line-break/><text:span text:style-name="T1"> </text:span><text:span text:style-name="T2">(72/3) </text:span> [ⲛ̅]ϥⲛ̅ⲧⲟ̣ⲩ ⲉϩⲟⲩⲛ ⲉⲡⲉⲩⲕⲁϩ <text:line-break/><text:span text:style-name="T1"> </text:span><text:span text:style-name="T2">(72/4) </text:span> ⲉⲧⲙ̅ⲡ̣ϣⲁ ⲛ̅ϥⲕⲱⲧ’ ⲛⲁⲩ ⲛ̅ⲛⲟⲩ‐ <text:line-break/><text:span text:style-name="T1"> </text:span><text:span text:style-name="T2">(72/5) </text:span> ⲙⲁ ⲛ̅ϣⲱⲡⲉ ⲉϥⲟⲩⲁⲁⲃ· ⲁⲩⲱ <text:line-break/><text:span text:style-name="T1"> </text:span><text:span text:style-name="T2">(72/6) </text:span> ⲥⲉⲛⲁⲙⲟⲩⲧⲉ ⲉⲣⲟⲟⲩ ϩⲙ̅ ⲡⲓⲣⲁⲛ̣ <text:line-break/><text:span text:style-name="T1"> </text:span><text:span text:style-name="T2">(72/7) </text:span> ⲉⲧⲙ̅ⲙⲁⲩ ⲛ̅ⲥⲉϣⲱⲡⲉ ⲙ̅ⲙⲁⲩ <text:line-break/><text:span text:style-name="T1"> </text:span><text:span text:style-name="T2">(72/8) </text:span> ⲛ̅ⲥⲟⲟⲩ ⲛ̅ϣⲉ ⲛ̅ⲣⲟⲙⲡⲉ ϩⲛ̅ ⲟⲩ‐ <text:line-break/><text:span text:style-name="T1"> </text:span><text:span text:style-name="T2">(72/9) </text:span> ⲥⲟⲟⲩⲛ ⲛ̅ⲧⲉ ϯⲁⲫⲑⲁⲣⲥⲓⲁ· <text:line-break/><text:span text:style-name="T1"> </text:span><text:span text:style-name="T2">(72/10) </text:span> ⲁⲩⲱ ⲥⲉⲛⲁϣⲱⲡⲉ ⲛⲙ̅ⲙⲁⲩ ⲛ̅ϭⲓ <text:line-break/><text:span text:style-name="T1"> </text:span><text:span text:style-name="T2">(72/11) </text:span> ϩⲉⲛⲁⲅ’ⲅⲉⲗⲟⲥ ⲛ̅ⲧⲉ ⲡⲓⲛⲟϭ ⲛ̅ⲟⲩⲟ̣‐ <text:line-break/><text:span text:style-name="T1"> </text:span><text:span text:style-name="T2">(72/12) </text:span> ⲉⲓⲛ· ⲛ̅ⲛⲉⲗⲁⲁⲩ ⲛ̅ϩⲱⲃ ⲛ̅ⲃⲟⲧⲉ <text:line-break/><text:span text:style-name="T1"> </text:span><text:span text:style-name="T2">(72/13) </text:span> ϣⲱⲡⲉ ϩⲙ̅ ⲡⲉⲩϩⲏⲧ’· ⲉⲃⲟⲗ <text:line-break/><text:span text:style-name="T1"> </text:span><text:span text:style-name="T2">(72/14) </text:span> ⲉϯⲅⲛⲱⲥⲓⲥ ⲟⲩⲁⲁⲥ ⲛ̅ⲧⲉ ⲡⲛⲟⲩ‐ <text:line-break/><text:span text:style-name="T1"> </text:span><text:span text:style-name="T2">(72/15) </text:span> ⲧⲉ· ⲧⲟⲧⲉ ⲛⲱϩⲉ ⲛⲁⲡⲉϣ ⲡⲕⲁϩ <text:line-break/><text:span text:style-name="T1"> </text:span><text:span text:style-name="T2">(72/16) </text:span> ⲧⲏⲣϥ̅ ⲉϩⲣⲁⲩ ⲛ̅ⲛⲉϥϣⲏⲣⲉ· <text:line-break/><text:span text:style-name="T1"> </text:span><text:span text:style-name="T2">(72/17) </text:span> ⲭ̅ⲁ̅ⲙ̅· ⲙⲛ̅ ⲓ̅ⲁⲫⲉⲑ̅· ⲙⲛ̅ ⲥ̅ⲏⲙ̅· <text:line-break/><text:span text:style-name="T1"> </text:span><text:span text:style-name="T2">(72/18) </text:span> ϥⲛⲁϫⲟⲟⲥ ⲛⲁⲩ ϫⲉ ⲛⲁϣⲏⲣⲉ <text:line-break/><text:span text:style-name="T1"> </text:span><text:span text:style-name="T2">(72/19) </text:span> ⲥⲱⲧⲙ̅ ⲉⲛⲁϣⲁϫⲉ· ⲉⲓⲥ ⲡⲕⲁϩ <text:line-break/><text:span text:style-name="T1"> </text:span><text:span text:style-name="T2">(72/20) </text:span> ⲁⲓ̈ⲡⲟϣϥ̅ ⲉϫⲛ̅ ⲧⲏⲩⲧⲛ̅· ⲁⲗⲗⲁ <text:line-break/><text:span text:style-name="T1"> </text:span><text:span text:style-name="T2">(72/21) </text:span> ϣⲙ̅ϣ〈ⲏ〉ⲧϥ̅ ϩⲛ̅ ⲟⲩϩⲟⲧⲉ ⲙⲛ̅ <text:line-break/><text:span text:style-name="T1"> </text:span><text:span text:style-name="T2">(72/22) </text:span> ⲟⲩⲙⲛ̅ⲧ’ϩⲙ̅ϩⲁⲗ ⲛ̅ⲛ̅ϩⲟⲟⲩ ⲧⲏ‐ <text:line-break/><text:span text:style-name="T1"> </text:span><text:span text:style-name="T2">(72/23) </text:span> ⲣⲟⲩ ⲛ̅ⲧⲉ ⲡⲉⲧⲛ̅ⲱⲛϩ̅· ⲙ̅ⲡⲣ̅ⲧⲣⲉ‐ <text:line-break/><text:span text:style-name="T1"> </text:span><text:span text:style-name="T2">(72/24) </text:span> [ⲡ]ⲉⲧⲛ̅ⲥⲡⲉⲣⲙⲁ ⲣ̅ ⲥⲁⲃⲟⲗ ⲙ̅ⲡϩ[ⲟ] <text:line-break/><text:span text:style-name="T1"> </text:span><text:span text:style-name="T2">(72/25) </text:span> [ⲙ̅ⲡ]ⲛ̣[ⲟ]ⲩ̣ⲧⲉ ⲡ̅ⲡⲁⲛⲧⲟⲕ̣[ⲣⲁⲧⲱⲣ] <text:line-break/><text:span text:style-name="T1"> </text:span><text:span text:style-name="T2">(72/26) </text:span> [....] ⲁ̣ⲛⲟⲕ ⲙⲛ̅ ⲡ̣[ⲉ]ⲧⲛ̅[ <text:line-break/><text:span text:style-name="T1"> </text:span><text:span text:style-name="T2">(72/27) </text:span> [ 6+-] ⲙ̣̅[....]ⲙ̣ⲛ̣̅[ <text:line-break/><text:soft-page-break/><text:span text:style-name="T1"> </text:span><text:span text:style-name="T2">(72/28) </text:span> (4+- lines lacking) <text:line-break/><text:span text:style-name="T1"> </text:span><text:span text:style-name="T2">(73/1) </text:span> [.....]ϣⲏ̣ⲣⲉ ⲛ̅ⲛⲱϩⲉ ϫⲉ̣ [ⲡⲁ]‐ <text:line-break/><text:span text:style-name="T1"> </text:span><text:span text:style-name="T2">(73/2) </text:span> ϭⲣⲟϭ ⲛ[ⲁ]ⲣ̣̅ ⲁ̣ⲛ̣ⲁ̣ϥ ⲙ̅ⲡⲉⲕⲙ̅ⲧⲟ ⲉⲃ[ⲟⲗ·] <text:line-break/><text:span text:style-name="T1"> </text:span><text:span text:style-name="T2">(73/3) </text:span> ⲁⲩⲱ ⲙ̅ⲡⲉⲙⲧⲟ ⲛ̅ⲧⲉⲕϩⲟⲙ· <text:line-break/><text:span text:style-name="T1"> </text:span><text:span text:style-name="T2">(73/4) </text:span> ⲁⲣⲓⲥⲫⲣⲁⲅⲓⲍⲉ ⲙ̅ⲙⲟϥ ϩⲛ̅ ⲧⲉⲕ‐ <text:line-break/><text:span text:style-name="T1"> </text:span><text:span text:style-name="T2">(73/5) </text:span> ϭⲓϫ ⲉⲧ’ϫⲟⲟⲣ ϩⲛ̅ ⲟⲩϩⲟⲧⲉ ⲙⲛ̅ <text:line-break/><text:span text:style-name="T1"> </text:span><text:span text:style-name="T2">(73/6) </text:span> ⲟⲩⲁϩ ⲥⲁϩⲛⲉ· ϫⲉ ⲡⲓϭⲣⲟϭ ⲧⲏ‐ <text:line-break/><text:span text:style-name="T1"> </text:span><text:span text:style-name="T2">(73/7) </text:span> ⲣϥ̅ ⲉⲧⲁϥ{ⲉ̅ⲓ} ⲉⲃⲟⲗ ⲛ̅ϩⲏⲧ’ ⲛ̅ⲥⲉ‐ <text:line-break/><text:span text:style-name="T1"> </text:span><text:span text:style-name="T2">(73/8) </text:span> ⲛⲁⲣⲁⲕⲧⲟⲩ ⲛ̅ⲥⲁⲃⲟⲗ ⲙ̅ⲙⲟⲕ <text:line-break/><text:span text:style-name="T1"> </text:span><text:span text:style-name="T2">(73/9) </text:span> ⲁⲛ ⲙⲛ̅ ⲡⲛⲟⲩⲧⲉ ⲡⲓⲡⲁⲛⲧⲟ‐ <text:line-break/><text:span text:style-name="T1"> </text:span><text:span text:style-name="T2">(73/10) </text:span> ⲕⲣⲁⲧⲱⲣ· ⲁⲗⲗⲁ ⲥⲉⲛⲁϣⲙ̅‐ <text:line-break/><text:span text:style-name="T1"> </text:span><text:span text:style-name="T2">(73/11) </text:span> ϣⲉ ϩⲛ̅ ⲟⲩⲑⲃ̅ⲃⲓⲟ ϫⲱϥ ⲙⲛ̅ <text:line-break/><text:span text:style-name="T1"> </text:span><text:span text:style-name="T2">(73/12) </text:span> ⲟⲩϩⲟⲧⲉ ⲛ̅ⲧⲉ ⲡⲉⲩⲉⲓⲙⲉ· <text:line-break/><text:span text:style-name="T1"> </text:span><text:span text:style-name="T2">(73/13) </text:span> ⲧⲟⲧⲉ ⲉⲣⲉϩⲉⲛⲕⲟⲟⲩⲉ ⲉⲃⲟⲗ <text:line-break/><text:span text:style-name="T1"> </text:span><text:span text:style-name="T2">(73/14) </text:span> ϩⲙ̅ ⲡⲥⲡⲉⲣⲙⲁ ⲛ̅ⲧⲉ ⲭ̅ⲁ̅ⲙ̅ ⲙⲛ̅ <text:line-break/><text:span text:style-name="T1"> </text:span><text:span text:style-name="T2">(73/15) </text:span> [ⲓ̈]ⲁ̅ⲫ̅ⲉ̅ⲑ̅· ⲉⲩⲉⲃⲱⲕ ⲛ̅ϭⲓ ϥⲧⲟⲟⲩ ⲛ̅ϣⲉ <text:line-break/><text:span text:style-name="T1"> </text:span><text:span text:style-name="T2">(73/16) </text:span> ⲛ̅ϣⲟ ⲛ̅ⲣⲱⲙⲉ· ⲛ̅ⲥⲉⲃⲱⲕ ⲉ‐ <text:line-break/><text:span text:style-name="T1"> </text:span><text:span text:style-name="T2">(73/17) </text:span> ϩⲟⲩⲛ ⲉⲕⲉⲕⲁϩ ⲛ̅ⲥⲉϭⲟⲉⲓⲗⲉ <text:line-break/><text:span text:style-name="T1"> </text:span><text:span text:style-name="T2">(73/18) </text:span> ⲉⲛⲣⲱⲙⲉ ⲉⲧⲙ̅ⲙⲁⲩ· ⲛⲏ ⲉ‐ <text:line-break/><text:span text:style-name="T1"> </text:span><text:span text:style-name="T2">(73/19) </text:span> ⲧⲁⲩϣⲱⲡⲉ ⲉⲃⲟⲗ ϩⲛ̅ ϯⲛⲟϭ <text:line-break/><text:span text:style-name="T1"> </text:span><text:span text:style-name="T2">(73/20) </text:span> ⲛ̅ⲅⲛⲱⲥⲓⲥ ⲛ̅ϣⲁ ⲉⲛⲉϩ· ϫⲉ <text:line-break/><text:span text:style-name="T1"> </text:span><text:span text:style-name="T2">(73/21) </text:span> ⲑⲁⲉⲓⲃⲉⲥ ⲛ̅ⲧⲉ ⲧⲉⲩϭⲟⲙ ⲛⲁ‐ <text:line-break/><text:span text:style-name="T1"> </text:span><text:span text:style-name="T2">(73/22) </text:span> ⲁⲣⲉϩ ⲉⲛⲉⲛⲧⲁⲩϭⲟⲉⲓⲗⲉ <text:line-break/><text:span text:style-name="T1"> </text:span><text:span text:style-name="T2">(73/23) </text:span> ⲉⲣⲟⲟⲩ ⲉⲃⲟⲗ ⲛ̅ϩⲱⲃ ⲛⲓⲙ ⲉⲑⲟⲟⲩ <text:line-break/><text:span text:style-name="T1"> </text:span><text:span text:style-name="T2">(73/24) </text:span> ⲙⲛ̅ ⲉⲡⲓⲑⲩⲙⲓⲁ ⲛⲓⲙ ⲉⲧ’ⲥⲟⲟϥ· <text:line-break/><text:span text:style-name="T1"> </text:span><text:span text:style-name="T2">(73/25) </text:span> ⲧⲟⲧⲉ ⲡⲥⲡⲉⲣⲙⲁ ⲛ̅ⲭ̅ⲁ̅ⲙ̅ ⲙⲛ̅ <text:line-break/><text:span text:style-name="T1"> </text:span><text:span text:style-name="T2">(73/26) </text:span> [ⲓ̅̈̅ⲁ̅]̅ⲫ̣̅̅ⲉ̅ⲑ̅ ⲛⲁⲣ̅ ⲙⲛ̅ⲧ’ⲥⲛⲟⲟⲩ[ⲥ] <text:line-break/><text:span text:style-name="T1"> </text:span><text:span text:style-name="T2">(73/27) </text:span> ⲙ̅ⲙⲛ̅ⲧⲣ̅ⲣⲟ· ⲁⲩⲱ ⲡ̣[ⲉ]ⲩ̣[ⲕⲉ]‐ <text:line-break/><text:span text:style-name="T1"> </text:span><text:span text:style-name="T2">(73/28) </text:span> [ⲥ]ⲡⲉⲣⲙⲁ ⲛⲁⲃⲱⲕ ⲉϩⲟⲩ[ⲛ] <text:line-break/><text:span text:style-name="T1"> </text:span><text:span text:style-name="T2">(73/29) </text:span> ⲉⲧⲙ̣ⲛ̣̅ⲧ̣ⲣ̣̅ⲣ̣[ⲟ] ⲛ̅ⲕⲉ̣ⲗⲁⲟⲥ[·] <text:line-break/><text:span text:style-name="T1"> </text:span><text:span text:style-name="T2">(73/30) </text:span> [ⲧⲟⲧ]ⲉ̣ ⲥ̣ⲉ̣ⲛ̣[ⲁ]ϣ̣ⲟ̣ϫ̣ⲛ̣ⲉ̣ ⲛ̅ϭ̣ⲓ̣ [ <text:line-break/><text:span text:style-name="T1"> </text:span><text:span text:style-name="T2">(73/31) </text:span> [.]ⲱ̣[.] ... [ⲛ]ⲉ̣ⲱ̣ⲛ̣ ϩⲁ ⲛⲉ[ <text:line-break/><text:span text:style-name="T1"> </text:span><text:span text:style-name="T2">(74/1) </text:span> [..]ⲙ̣ⲉ ⲉⲧ’ⲙⲟⲟⲩⲧ’ [ⲛ̅]ⲧ[ⲉ] ⲛ̣̅ⲛⲟϭ <text:line-break/><text:span text:style-name="T1"> </text:span><text:span text:style-name="T2">(74/2) </text:span> [ⲛ̅]ⲛ̣ⲉⲱⲛ ⲛ̅ⲧⲉ ϯⲁⲫⲑⲁⲣⲥⲓⲁ· <text:line-break/><text:span text:style-name="T1"> </text:span><text:span text:style-name="T2">(74/3) </text:span> [ⲁ]ⲩⲱ ⲥⲉⲛⲁⲃⲱⲕ ϩⲁ ⲥ̅ⲁ̅ⲕ̅ⲗ̅ⲁ̅ <text:line-break/><text:span text:style-name="T1"> </text:span><text:span text:style-name="T2">(74/4) </text:span> ⲡ̣ⲉⲩⲛⲟⲩⲧⲉ· ⲥⲉⲛⲁⲃⲱⲕ ⲉϩⲟⲩⲛ <text:line-break/><text:span text:style-name="T1"> </text:span><text:span text:style-name="T2">(74/5) </text:span> ⲉⲛⲓϭⲟⲙ ⲉⲩⲣ̅ⲕⲁⲧⲏⲅⲟⲣⲓ ⲛ̅ⲛⲓⲛⲟϭ <text:line-break/><text:span text:style-name="T1"> </text:span><text:span text:style-name="T2">(74/6) </text:span> ⲛ̅ⲣⲱⲙⲉ ⲛⲏ ⲉⲧ’ϣⲟⲟⲡ’ ϩⲙ̅ ⲡⲉⲩⲉ‐ <text:line-break/><text:span text:style-name="T1"> </text:span><text:span text:style-name="T2">(74/7) </text:span> ⲟⲟⲩ· ⲥⲉⲛⲁϫⲟⲟⲥ ⲛ̅ⲥ̅ⲁ̅ⲕ̅ⲗ̅ⲁ̅ ϫⲉ <text:line-break/><text:span text:style-name="T1"> </text:span><text:span text:style-name="T2">(74/8) </text:span> ⲟⲩ ⲧⲉ ⲧϭⲟⲙ ⲛ̅ⲛⲉⲓ̈ⲣⲱⲙⲉ ⲉⲧⲁⲩ‐ <text:line-break/><text:span text:style-name="T1"> </text:span><text:span text:style-name="T2">(74/9) </text:span> ⲁϩⲉⲣⲁⲧⲟⲩ ⲙ̅ⲡⲉⲕⲙ̅ⲧⲟ ⲉⲃⲟⲗ <text:line-break/><text:span text:style-name="T1"> </text:span><text:span text:style-name="T2">(74/10) </text:span> ⲛⲁⲓ̈ ⲉⲧⲁⲩϥⲓⲧⲟⲩ ⲉⲃⲟⲗ ϩⲙ̅ ⲡⲓ‐ <text:line-break/><text:span text:style-name="T1"> </text:span><text:span text:style-name="T2">(74/11) </text:span> ⲥⲡⲉⲣⲙⲁ ⲛ̅ⲧⲉ ⲭ̅ⲁ̅ⲙ̅ ⲙⲛ̅ ⲓ̅̈ⲁⲫⲉⲑ̅ <text:line-break/><text:span text:style-name="T1"> </text:span><text:span text:style-name="T2">(74/12) </text:span> ⲉⲩⲛⲁⲣ̅ ϥⲧⲟⲟⲩ ⲛ̅ϣⲉ 〈ⲛ̅ϣⲟ〉 ⲛ̅ⲣⲱⲙⲉ <text:line-break/><text:span text:style-name="T1"> </text:span><text:span text:style-name="T2">(74/13) </text:span> ⲁⲩϫⲓⲧⲟⲩ ⲉϩⲟⲩⲛ ⲉⲕⲉⲉⲱⲛ ⲡⲏ <text:line-break/><text:span text:style-name="T1"> </text:span><text:span text:style-name="T2">(74/14) </text:span> ⲉⲧⲁⲩϣⲱⲡⲉ ⲉⲃⲟⲗ ⲛ̅ϩⲏⲧϥ̅ ⲁⲩⲱ <text:line-break/><text:span text:style-name="T1"> </text:span><text:span text:style-name="T2">(74/15) </text:span> ⲁⲩⲕⲧⲟ ⲙ̅ⲡⲉⲟⲟⲩ ⲧⲏⲣϥ̅ ⲛ̅ⲧⲉ ⲧⲉⲕ‐ <text:line-break/><text:soft-page-break/><text:span text:style-name="T1"> </text:span><text:span text:style-name="T2">(74/16) </text:span> ϭⲟⲙ ⲙⲛ̅ ⲧⲙⲛ̅ⲧⲣ̅ⲣⲟ ⲛ̅ⲧⲉ ⲧⲉⲕϭⲓϫ <text:line-break/><text:span text:style-name="T1"> </text:span><text:span text:style-name="T2">(74/17) </text:span> ϫⲉ ⲁⲡⲉⲥⲡⲉⲣⲙⲁ ⲛ̅ⲧⲉ ⲛⲱϩⲉ ⲉⲃⲟⲗ <text:line-break/><text:span text:style-name="T1"> </text:span><text:span text:style-name="T2">(74/18) </text:span> ϩⲙ̅ ⲡⲉϥϣⲏⲣⲉ ⲁϥⲉⲓⲣⲉ ⲙ̅ⲡⲉⲕⲟⲩ‐ <text:line-break/><text:span text:style-name="T1"> </text:span><text:span text:style-name="T2">(74/19) </text:span> ⲱϣ ⲧⲏⲣϥ̅ ⲙⲛ̅ ⲛⲓϭⲟⲙ ⲧⲏⲣⲟⲩ <text:line-break/><text:span text:style-name="T1"> </text:span><text:span text:style-name="T2">(74/20) </text:span> ϩⲛ̅ ⲛⲓⲉⲱⲛ ⲉⲧⲁⲡⲉⲕⲁⲙⲁϩⲧⲉ <text:line-break/><text:span text:style-name="T1"> </text:span><text:span text:style-name="T2">(74/21) </text:span> ⲣ̅ ⲣ̅ⲣⲟ ⲉϩⲣⲁⲓ̈ ⲉϫⲱⲟⲩ· ⲙⲛ̅ ⲛⲓⲣⲱ‐ <text:line-break/><text:span text:style-name="T1"> </text:span><text:span text:style-name="T2">(74/22) </text:span> ⲙⲉ ⲉⲧⲙ̅ⲙⲁⲩ ⲙⲛ̅ ⲛⲏ ⲉⲧⲉ ⲛ̅‐ <text:line-break/><text:span text:style-name="T1"> </text:span><text:span text:style-name="T2">(74/23) </text:span> ⲣⲙ̅ ⲛ̅ϭⲁⲉⲓⲗⲉ ϩⲙ̅ ⲡⲉⲩⲉⲟⲟⲩ· <text:line-break/><text:span text:style-name="T1"> </text:span><text:span text:style-name="T2">(74/24) </text:span> [ⲉ]ⲙⲡⲟⲩⲉⲓⲣⲉ ⲙ̅ⲡⲉⲧⲉϩⲛⲁⲕ· <text:line-break/><text:span text:style-name="T1"> </text:span><text:span text:style-name="T2">(74/25) </text:span> [ⲁⲗⲗ]ⲁ ⲁⲩⲡⲱⲱⲛⲉ ⲙ̅ⲡⲉⲕ‐ <text:line-break/><text:span text:style-name="T1"> </text:span><text:span text:style-name="T2">(74/26) </text:span> [ⲙⲏ]ⲏ̣ϣ̣ⲉ ⲧⲏⲣϥ̅· ⲧⲟⲧⲉ ⲡⲛⲟⲩ‐ <text:line-break/><text:span text:style-name="T1"> </text:span><text:span text:style-name="T2">(74/27) </text:span> [ⲧⲉ] ⲛ̣̅[ⲧ]ⲉ̣ ⲛⲓⲉⲱⲛ ϥ̣ⲛⲁϯ ⲛⲁⲩ <text:line-break/><text:span text:style-name="T1"> </text:span><text:span text:style-name="T2">(74/28) </text:span> [ⲉⲃⲟ]ⲗ̣ ϩⲛ̅ ⲛⲏ ⲉⲧ’ϣ̣ⲙ̅ϣⲉ ⲙ̅ⲙ̣ⲟ̣[ϥ] <text:line-break/><text:span text:style-name="T1"> </text:span><text:span text:style-name="T2">(74/29) </text:span> [...]ⲗ̣ⲧ̅’ ⲛ̅ⲥⲁ ϯⲃ[.]ⲩⲥ ⲛ̅ⲕ[ <text:line-break/><text:span text:style-name="T1"> </text:span><text:span text:style-name="T2">(74/30) </text:span> ⲥⲉ̣ⲛ̅ⲛⲏⲩ ⲉϫⲙ̅ ⲡ̣[ⲕ]ⲁ̣ϩ ⲉ[ⲧ]ⲙ̣̅‐ <text:line-break/><text:span text:style-name="T1"> </text:span><text:span text:style-name="T2">(75/1) </text:span> [ⲙ]ⲁ̣[ⲩ·] ⲡ̣ⲏ [ⲉ]ⲧⲟⲩⲛⲁϣⲱⲡⲉ ⲛ̣̅[ϩⲏ]‐ <text:line-break/><text:span text:style-name="T1"> </text:span><text:span text:style-name="T2">(75/2) </text:span> ⲧϥ̅ ⲛ̅ϭⲓ ⲛⲓⲛⲟ̣ϭ ⲛ̅ⲣⲱⲙⲉ· ⲛⲏ ⲉⲧ̣[ⲉ] <text:line-break/><text:span text:style-name="T1"> </text:span><text:span text:style-name="T2">(75/3) </text:span> ⲙ̅ⲡⲟⲩϫⲱϩⲙ̅· ⲟⲩⲧⲉ ⲛ̅ⲥⲉⲛⲁ‐ <text:line-break/><text:span text:style-name="T1"> </text:span><text:span text:style-name="T2">(75/4) </text:span> ϫⲱϩⲙ̅ ⲁⲛ ϩⲛ̅ⲛ ⲉⲡⲓⲑⲩⲙⲓⲁ ⲛⲓⲙ <text:line-break/><text:span text:style-name="T1"> </text:span><text:span text:style-name="T2">(75/5) </text:span> ϫⲉ ⲛ̅ⲧⲁⲧⲉⲩⲯⲩⲭⲏ ϣⲱⲡⲉ ⲁⲛ <text:line-break/><text:span text:style-name="T1"> </text:span><text:span text:style-name="T2">(75/6) </text:span> ϩⲛ̅ ⲟⲩϭⲓϫ ⲉⲥϫⲁϩⲙ̅· ⲁⲗⲗⲁ ⲁⲥϣⲱ‐ <text:line-break/><text:span text:style-name="T1"> </text:span><text:span text:style-name="T2">(75/7) </text:span> ⲡⲉ ⲉⲃⲟⲗ ϩⲛ̅ ⲟⲩⲛⲟϭ ⲛ̅ⲟⲩⲁϩ ⲥⲁϩⲛⲉ <text:line-break/><text:span text:style-name="T1"> </text:span><text:span text:style-name="T2">(75/8) </text:span> ⲛ̅ⲧⲉ ⲟⲩⲁⲅ’ⲅⲉⲗⲟⲥ ⲛ̅ϣⲁ ⲉⲛⲉϩ· <text:line-break/><text:span text:style-name="T1"> </text:span><text:span text:style-name="T2">(75/9) </text:span> ⲧⲟⲧⲉ ⲥⲉⲛⲁⲛⲟⲩϫⲉ ⲛ̅ⲟⲩⲕⲱϩⲧ̅’ <text:line-break/><text:span text:style-name="T1"> </text:span><text:span text:style-name="T2">(75/10) </text:span> ⲙⲛ̅ ⲟⲩⲑⲏⲛ ⲙⲛ̅ ⲟⲩⲁⲙⲣⲏϩⲉ ⲉϫⲛ̅ <text:line-break/><text:span text:style-name="T1"> </text:span><text:span text:style-name="T2">(75/11) </text:span> ⲛⲓⲣⲱⲙⲉ ⲉⲧⲙ̅ⲙⲁⲩ· ⲁⲩⲱ ⲉⲣⲉ‐ <text:line-break/><text:span text:style-name="T1"> </text:span><text:span text:style-name="T2">(75/12) </text:span> ⲟⲩⲕⲱϩⲧ̅’ ⲙⲛ̅ ⲟⲩϩⲗⲟⲥⲧⲛ̅ {ⲉ̅ⲓ} ⲉϫⲛ̅ <text:line-break/><text:span text:style-name="T1"> </text:span><text:span text:style-name="T2">(75/13) </text:span> ⲛⲓⲉⲱⲛ ⲉⲧⲙ̅ⲙⲁⲩ ⲛ̅ⲥⲉⲣ̅ ⲕⲁⲕⲉ <text:line-break/><text:span text:style-name="T1"> </text:span><text:span text:style-name="T2">(75/14) </text:span> ⲛ̅ϭⲓ ⲛ̅ⲃⲁⲗ ⲛ̅ⲛⲓϭⲟⲙ ⲛ̅ⲧⲉ ⲛⲓⲫⲱⲥ‐ <text:line-break/><text:span text:style-name="T1"> </text:span><text:span text:style-name="T2">(75/15) </text:span> ⲧⲏⲣ ⲛ̅ⲥⲉⲧⲙ̅ⲛⲁⲩ ⲉⲃⲟⲗ ⲙ̅ⲙⲟⲟⲩ <text:line-break/><text:span text:style-name="T1"> </text:span><text:span text:style-name="T2">(75/16) </text:span> ⲛ̅ϭⲓ ⲛⲓⲉⲱⲛ ϩⲛ̅ ⲛⲉϩⲟⲟⲩ ⲉⲧⲙ̅ⲙⲁⲩ· <text:line-break/><text:span text:style-name="T1"> </text:span><text:span text:style-name="T2">(75/17) </text:span> ⲁⲩⲱ ⲥⲉⲛ̅ⲛⲏⲩ ⲉϩⲣⲁⲓ̈ ⲛ̅ϭⲓ ϩⲉⲛ‐ <text:line-break/><text:span text:style-name="T1"> </text:span><text:span text:style-name="T2">(75/18) </text:span> ⲛⲟϭ ⲛ̅ⲕⲗⲟⲟⲗⲉ ⲛ̅ⲟⲩⲟⲉⲓⲛ ⲛ̅ⲥⲉ‐ <text:line-break/><text:span text:style-name="T1"> </text:span><text:span text:style-name="T2">(75/19) </text:span> {ⲉ̅ⲓ} ⲉϩⲣⲁⲓ̈ ⲉϫⲱⲟⲩ ⲛ̅ϭⲓ ϩⲉⲛⲕⲉ‐ <text:line-break/><text:span text:style-name="T1"> </text:span><text:span text:style-name="T2">(75/20) </text:span> ⲕⲗⲟⲟⲗⲉ ⲛ̅ⲟⲩⲟⲉⲓⲛ ⲉⲃⲟⲗ ϩⲛ̅ <text:line-break/><text:span text:style-name="T1"> </text:span><text:span text:style-name="T2">(75/21) </text:span> ⲛⲓⲛⲟϭ ⲛ̅ⲛⲉⲱⲛ· ⲥⲉⲛ̅ⲛⲏⲩ ⲉϩⲣⲁⲓ̈ <text:line-break/><text:span text:style-name="T1"> </text:span><text:span text:style-name="T2">(75/22) </text:span> ⲛ̅ϭⲓ ⲁ̅ⲃ̅ⲣ̅ⲁ̅ⲥ̅ⲁ̅ⲝ̅ ⲙⲛ̅ ⲥ̅ⲁⲃⲗⲱ̅ ⲙⲛ̅ <text:line-break/><text:span text:style-name="T1"> </text:span><text:span text:style-name="T2">(75/23) </text:span> ⲅ̅ⲁ̅ⲙ̅ⲁ̅ⲗ̅ⲓ̅ⲏ̅ⲗ̅· ⲛ̅ⲥⲉⲉⲓⲛⲉ ⲛ̅ⲛⲓ‐ <text:line-break/><text:span text:style-name="T1"> </text:span><text:span text:style-name="T2">(75/24) </text:span> ⲣⲱⲙⲉ ⲉⲧⲙ̅ⲙⲁⲩ ⲉⲃⲟⲗ ϩⲙ̅ <text:line-break/><text:span text:style-name="T1"> </text:span><text:span text:style-name="T2">(75/25) </text:span> ⲡⲓⲕⲱϩⲧ̅’ ⲙⲛ̅ ⲡⲓϭⲱⲛⲧ̅’ ⲛ̅‐ <text:line-break/><text:span text:style-name="T1"> </text:span><text:span text:style-name="T2">(75/26) </text:span> ⲥⲉϫⲓⲧⲟⲩ ⲛ̅ⲥⲁⲧⲡⲉ ⲛ̅ⲛⲓⲁⲓ̣[ⲱⲛ] <text:line-break/><text:span text:style-name="T1"> </text:span><text:span text:style-name="T2">(75/27) </text:span> ⲙⲛ̅ ⲛⲓⲁⲣⲭⲏ ⲛ̅ⲧⲉ ⲛⲓϭⲟ̣ⲙ̣ ⲛ̅ⲥⲉ‐ <text:line-break/><text:span text:style-name="T1"> </text:span><text:span text:style-name="T2">(75/28) </text:span> [ϫⲓ]ⲧⲟⲩ· ⲉⲃⲟⲗ̣ [ <text:line-break/><text:span text:style-name="T1"> </text:span><text:span text:style-name="T2">(75/29) </text:span> [.]ⲟⲩ ⲛ̅ⲱⲛϩ̅ ⲁ̣[ <text:line-break/><text:span text:style-name="T1"> </text:span><text:span text:style-name="T2">(75/30) </text:span> [ⲛ̅]ⲥ̣ⲉϫⲓⲧⲟⲩ ⲉ[ⲃⲟⲗ <text:line-break/><text:span text:style-name="T1"> </text:span><text:span text:style-name="T2">(75/31) </text:span> ⲛ̣̅ⲛⲉⲱⲛ· ⲡⲁ̣.[.....ⲙⲁ] <text:line-break/><text:span text:style-name="T1"> </text:span><text:span text:style-name="T2">(76/1) </text:span> [ⲛ̅ϣ]ⲱⲡⲉ ⲛ̅ⲧⲉ ⲛⲓⲛ[ⲟ]ϭ̣ ⲙ[..]ⲃ̣ⲁ̣ <text:line-break/><text:soft-page-break/><text:span text:style-name="T1"> </text:span><text:span text:style-name="T2">(76/2) </text:span> [.]ⲣ ⲙ̅ⲙⲁⲩ ⲙⲛ̅ ⲛⲓⲁⲅ’ⲅⲉⲗ̣ⲟⲥ ⲉ‐ <text:line-break/><text:span text:style-name="T1"> </text:span><text:span text:style-name="T2">(76/3) </text:span> [ⲧ]ⲟ̣ⲩⲁⲁⲃ ⲙⲛ̅ ⲛⲓⲉⲱⲛ· ⲥⲉⲛⲁ‐ <text:line-break/><text:span text:style-name="T1"> </text:span><text:span text:style-name="T2">(76/4) </text:span> ϣ̣ⲱⲡⲉ ⲛ̅ϭⲓ ⲛⲓⲣⲱⲙⲉ ⲉⲩⲉⲓⲛⲉ <text:line-break/><text:span text:style-name="T1"> </text:span><text:span text:style-name="T2">(76/5) </text:span> ⲛ̅ⲛⲓⲁⲅ’ⲅⲉⲗⲟⲥ ⲉⲧⲙ̅ⲙⲁⲩ ϫⲉ ϩⲉⲛ‐ <text:line-break/><text:span text:style-name="T1"> </text:span><text:span text:style-name="T2">(76/6) </text:span> ϣⲙ̅ⲙⲟ ⲙ̅ⲙⲟⲟⲩ ⲁⲛ ⲛⲉ· ⲁⲗⲗⲁ <text:line-break/><text:span text:style-name="T1"> </text:span><text:span text:style-name="T2">(76/7) </text:span> ⲉⲩⲣ̅ ϩⲱⲃ ϩⲛ̅ ϯⲥⲡⲟⲣⲁ ⲛ̅ⲁⲧ’ⲧⲁⲕⲟ· <text:line-break/><text:span text:style-name="T1"> </text:span><text:span text:style-name="T2">(76/8) </text:span> ⲡⲁⲗⲓⲛ ⲟⲛ ϥⲛⲁⲥⲓⲛⲉ ⲙ̅ⲡⲙⲉϩ‐ <text:line-break/><text:span text:style-name="T1"> </text:span><text:span text:style-name="T2">(76/9) </text:span> ϣⲟⲙⲉⲧ’ ⲛ̅ⲥⲟⲡ’ ⲛ̅ϭⲓ ⲡⲓⲫⲱⲥ‐ <text:line-break/><text:span text:style-name="T1"> </text:span><text:span text:style-name="T2">(76/10) </text:span> ⲧⲏⲣ ⲛ̅ⲧⲉ ϯⲅⲛⲱⲥⲓⲥ ϩⲛ̅ ⲟⲩⲛⲟϭ <text:line-break/><text:span text:style-name="T1"> </text:span><text:span text:style-name="T2">(76/11) </text:span> ⲛ̅ⲛⲉⲟⲟⲩ· {ϩ̅ⲓ}ⲛⲁ ϫⲉ ⲉϥⲉϣⲱϫⲡ̅’ <text:line-break/><text:span text:style-name="T1"> </text:span><text:span text:style-name="T2">(76/12) </text:span> ⲉⲃⲟⲗ ϩⲙ̅ ⲡⲓⲥⲡⲉⲣⲙⲁ ⲛ̅ⲧⲉ ⲛ̅ⲱ̅ϩ̅ⲉ̅ <text:line-break/><text:span text:style-name="T1"> </text:span><text:span text:style-name="T2">(76/13) </text:span> ⲙⲛ̅ ⲛⲓϣⲏⲣⲉ ⲛ̅ⲧⲉ ⲭ̅ⲁ̅ⲙ̅ ⲙⲛ̅ ̅ⲓ̈ⲫⲉⲑ̅ <text:line-break/><text:span text:style-name="T1"> </text:span><text:span text:style-name="T2">(76/14) </text:span> ϫⲉ ⲉϥⲉϣⲱϫⲡ̅’ ⲛⲁϥ ⲛ̅ϩⲉⲛϣⲏⲛ <text:line-break/><text:span text:style-name="T1"> </text:span><text:span text:style-name="T2">(76/15) </text:span> ⲛ̅ⲣⲉϥϯ ⲟⲩⲧⲁϩ· ⲁⲩⲱ ϥⲛⲁⲥⲱ‐ <text:line-break/><text:span text:style-name="T1"> </text:span><text:span text:style-name="T2">(76/16) </text:span> ⲧⲉ ⲛ̅ⲛⲉⲩⲯⲩⲭⲏ ⲉⲃⲟⲗ ϩⲙ̅ ⲡⲉϩⲟ‐ <text:line-break/><text:span text:style-name="T1"> </text:span><text:span text:style-name="T2">(76/17) </text:span> ⲟⲩ ⲙ̅ⲡⲙⲟⲩ· ϫⲉ ⲡⲓⲡⲗⲁⲥⲙⲁ <text:line-break/><text:span text:style-name="T1"> </text:span><text:span text:style-name="T2">(76/18) </text:span> ⲧⲏⲣϥ̅ ⲉⲧⲁϥϣⲱⲡⲉ ⲉⲃⲟⲗ ϩⲙ̅ <text:line-break/><text:span text:style-name="T1"> </text:span><text:span text:style-name="T2">(76/19) </text:span> ⲡⲓⲕⲁϩ ⲉⲧ’ⲙⲟⲟⲩⲧ’· ⲥⲉⲛⲁϣⲱ‐ <text:line-break/><text:span text:style-name="T1"> </text:span><text:span text:style-name="T2">(76/20) </text:span> ⲡⲉ ϩⲁ ⲧⲉⲝⲟⲩⲥⲓⲁ ⲙ̅ⲡⲙⲟⲩ· <text:line-break/><text:span text:style-name="T1"> </text:span><text:span text:style-name="T2">(76/21) </text:span> ⲛⲏ ⲇⲉ ⲉⲧ’ⲙⲉⲉⲩⲉ ⲉϯⲅⲛⲱⲥⲓⲥ <text:line-break/><text:span text:style-name="T1"> </text:span><text:span text:style-name="T2">(76/22) </text:span> ⲛ̅ⲧⲉ ⲡⲓϣⲁ ⲉⲛⲉϩ ⲡⲛⲟⲩⲧⲉ <text:line-break/><text:span text:style-name="T1"> </text:span><text:span text:style-name="T2">(76/23) </text:span> ϩⲙ̅ ⲡⲉⲩϩⲏⲧ’ ⲛ̅ⲥⲉⲛⲁⲧⲁⲕⲟ <text:line-break/><text:span text:style-name="T1"> </text:span><text:span text:style-name="T2">(76/24) </text:span> ⲁⲛ ϫⲉ ⲙ̅ⲡⲟⲩϫⲓ ⲡ̅ⲛ̅ⲁ̅ <text:line-break/><text:span text:style-name="T1"> </text:span><text:span text:style-name="T2">(76/25) </text:span> ⲉⲃⲟⲗ ϩⲛ̅ ⲧⲉⲓ̈ⲙⲛ̅ⲧⲣ̅ⲣⲟ ⲛ̅ⲟⲩⲱⲧ̣ <text:line-break/><text:span text:style-name="T1"> </text:span><text:span text:style-name="T2">(76/26) </text:span> [ⲁ]ⲗ̣ⲗⲁ ⲛ̅ⲧⲁⲩϫⲓ ⲛ̅ⲧⲟⲟⲧ̣ϥ̣̅ ⲛ̅ⲟⲩ[ <text:line-break/><text:span text:style-name="T1"> </text:span><text:span text:style-name="T2">(76/27) </text:span> [.]. ⲛ̅ⲁⲅ’ⲅⲉⲗⲟⲥ ⲛ̅ϣⲁ ⲉⲛⲉϩ· <text:line-break/><text:span text:style-name="T1"> </text:span><text:span text:style-name="T2">(76/28) </text:span> [ 10+- ]ⲙ̣̅ⲫⲱⲥⲧⲏ[ⲣ] <text:line-break/><text:span text:style-name="T1"> </text:span><text:span text:style-name="T2">(76/29) </text:span> [ 9+- ⲛ̅ⲛ]ⲏ̣ⲟⲩ ⲉϫ̣ⲛ̣̅ <text:line-break/><text:span text:style-name="T1"> </text:span><text:span text:style-name="T2">(76/30) </text:span> [ 6+-ⲉⲧⲙ]ⲟ̣ⲟⲩⲧ’· ⲧⲏ <text:line-break/><text:span text:style-name="T1"> </text:span><text:span text:style-name="T2">(76/31) </text:span> [ 10+- ]ⲓ̣ⲍⲉ ⲙ̅ⲙⲟ̣. <text:line-break/><text:span text:style-name="T1"> </text:span><text:span text:style-name="T2">(77/1) </text:span> [.]ⲡ̣[..] ⲛ̅ⲥ̅ⲏ̅ⲑ̅· ⲛ̅ϥⲉⲓⲣⲉ ⲛ̅ϩⲉⲛ‐ <text:line-break/><text:span text:style-name="T1"> </text:span><text:span text:style-name="T2">(77/2) </text:span> ⲙⲁⲉⲓⲛ ⲙⲛ̅ ϩⲉⲛϣⲡⲏⲣⲉ ϫⲉ ⲉϥⲉ‐ <text:line-break/><text:span text:style-name="T1"> </text:span><text:span text:style-name="T2">(77/3) </text:span> ϯ ⲥⲱϣ· ⲛ̅ⲛ→ⲓ←ϭⲟⲙ ⲙⲛ̅ ⲡⲉⲩⲁⲣⲭ̣ⲱ̣[ⲛ] <text:line-break/><text:span text:style-name="T1"> </text:span><text:span text:style-name="T2">(77/4) </text:span> ⲧⲟⲧⲉ ϥⲛⲁϣⲧⲟⲣⲧⲣ̅ ⲛ̅ϭⲓ ⲡⲛⲟⲩⲧⲉ <text:line-break/><text:span text:style-name="T1"> </text:span><text:span text:style-name="T2">(77/5) </text:span> ⲛ̅ⲧⲉ ⲛⲓϭⲟⲙ· ⲉϥϫⲱ ⲙ̅ⲙⲟⲥ ϫⲉ ⲁϣ <text:line-break/><text:span text:style-name="T1"> </text:span><text:span text:style-name="T2">(77/6) </text:span> ⲧⲉ ⲧ’ϭⲟⲙ ⲛ̅ⲧⲉ ⲡⲓⲣⲱⲙⲉ ⲉⲧ’‐ <text:line-break/><text:span text:style-name="T1"> </text:span><text:span text:style-name="T2">(77/7) </text:span> ϫⲟⲥⲉ ⲉⲣⲟⲛ· ⲧⲟⲧⲉ ϥⲛⲁⲧⲟⲩ‐ <text:line-break/><text:span text:style-name="T1"> </text:span><text:span text:style-name="T2">(77/8) </text:span> ⲛⲟⲥ ⲟⲩⲛⲟϭ ⲛ̅ϭⲱⲛⲧ̅’ ⲉϫⲙ̅ ⲡⲓ‐ <text:line-break/><text:span text:style-name="T1"> </text:span><text:span text:style-name="T2">(77/9) </text:span> ⲣⲱⲙⲉ ⲉⲧⲙ̅ⲙⲁⲩ· ⲁⲩⲱ ⲉϥⲉ‐ <text:line-break/><text:span text:style-name="T1"> </text:span><text:span text:style-name="T2">(77/10) </text:span> ⲟⲩⲱⲧⲃ̅ ⲛ̅ϭⲓ ⲡⲓⲉⲟⲟⲩ ⲛ̅ϥϣⲱ‐ <text:line-break/><text:span text:style-name="T1"> </text:span><text:span text:style-name="T2">(77/11) </text:span> ⲡⲉ ϩⲛ̅ ϩⲉⲛⲏⲉⲓ ⲉⲩⲟⲩⲁⲁⲃ ⲛⲏ <text:line-break/><text:span text:style-name="T1"> </text:span><text:span text:style-name="T2">(77/12) </text:span> ⲉⲧⲁϥⲥⲟⲧⲡⲟⲩ ⲛⲁϥ· ⲁⲩⲱ ⲛ̅‐ <text:line-break/><text:span text:style-name="T1"> </text:span><text:span text:style-name="T2">(77/13) </text:span> ⲥⲉⲛⲁⲛⲁⲩ ⲉⲣⲟϥ ⲁⲛ ⲛ̅ϭⲓ ⲛⲓϭⲟⲙ <text:line-break/><text:span text:style-name="T1"> </text:span><text:span text:style-name="T2">(77/14) </text:span> ϩ̣ⲛ̅ ⲛⲉⲩⲃⲁⲗ· ⲟⲩⲧⲉ ⲛ̅ⲥⲉⲛⲁ‐ <text:line-break/><text:span text:style-name="T1"> </text:span><text:span text:style-name="T2">(77/15) </text:span> [ⲛ]ⲁ̣ⲩ ⲁⲛ ⲉⲡⲓⲕⲉⲫⲱⲥⲧⲏⲣ· <text:line-break/><text:span text:style-name="T1"> </text:span><text:span text:style-name="T2">(77/16) </text:span> ⲧⲟⲧⲉ ⲥⲉⲛⲁⲣ̅ⲕⲟⲗⲁⲍⲉ ⲛ̅ⲧⲥⲁ‐ <text:line-break/><text:span text:style-name="T1"> </text:span><text:span text:style-name="T2">(77/17) </text:span> ⲣⲁⲝ ⲙ̅ⲡⲓⲣⲱⲙⲉ ⲉⲧⲁⲡⲓⲡ̅ⲛ̅ⲁ̅ <text:line-break/><text:soft-page-break/><text:span text:style-name="T1"> </text:span><text:span text:style-name="T2">(77/18) </text:span> ⲉⲧⲟⲩⲁⲁⲃ {ⲉ̅ⲓ} ⲉϫⲱϥ· ⲧⲟⲧⲉ <text:line-break/><text:span text:style-name="T1"> </text:span><text:span text:style-name="T2">(77/19) </text:span> ⲥⲉⲛⲁⲣ̅ⲭⲣⲁⲥⲑⲁⲓ ⲙ̅ⲡⲓⲣⲁⲛ ⲛ̅ϭⲓ <text:line-break/><text:span text:style-name="T1"> </text:span><text:span text:style-name="T2">(77/20) </text:span> ⲛⲓⲁⲅ’ⲅⲉⲗⲟⲥ ⲙⲛ̅ ⲛⲓⲅⲉⲛⲉⲁ <text:line-break/><text:span text:style-name="T1"> </text:span><text:span text:style-name="T2">(77/21) </text:span> ⲧ̣ⲏⲣⲟⲩ ⲛ̅ⲧⲉ ⲛⲓϭⲟⲙ ϩⲛ̅ ⲟⲩ‐ <text:line-break/><text:span text:style-name="T1"> </text:span><text:span text:style-name="T2">(77/22) </text:span> ⲡⲗⲁⲛⲏ ⲉⲩϫⲱ ⲙ̅ⲙⲟⲥ ϫⲉ <text:line-break/><text:span text:style-name="T1"> </text:span><text:span text:style-name="T2">(77/23) </text:span> ⲁⲥϣⲱⲡⲉ ⲉⲃⲟⲗ ⲧⲱⲛ ⲏ%0 ⲛ̅‐ <text:line-break/><text:span text:style-name="T1"> </text:span><text:span text:style-name="T2">(77/24) </text:span> ⲧⲁⲩ{ⲉ̅ⲓ} ⲉⲃⲟⲗ ⲧⲱⲛ ⲛ̅ϭⲓ ⲛⲓϣⲁ‐ <text:line-break/><text:span text:style-name="T1"> </text:span><text:span text:style-name="T2">(77/25) </text:span> ϫⲉ ⲙ̅ⲙⲛ̅ⲧ’ⲛⲟⲩϫ· ⲛⲁⲓ̈ ⲉ‐ <text:line-break/><text:span text:style-name="T1"> </text:span><text:span text:style-name="T2">(77/26) </text:span> ⲧⲉ ⲙ̅ⲡⲟⲩϭⲛ̅ⲧⲟⲩ ⲛ̅ϭⲓ ⲛⲓϭ̣[ⲟⲙ] <text:line-break/><text:span text:style-name="T1"> </text:span><text:span text:style-name="T2">(77/27) </text:span> ⲧⲏⲣⲟⲩ· ϯϩⲟⲩⲉ̣ⲓ̣ⲧ̣ⲉ̣ ⲟ̣ⲩ̣[ⲛ] <text:line-break/><text:span text:style-name="T1"> </text:span><text:span text:style-name="T2">(77/28) </text:span> ⲙ̣̅ⲙⲛ̅ⲧⲣ̅ⲣ̣[ⲟ ϫⲱ ⲙ̅ⲙⲟⲥ ⲉⲣⲟϥ] <text:line-break/><text:span text:style-name="T1"> </text:span><text:span text:style-name="T2">(77/29) </text:span> [ϫⲉ ⲁ]ϥϣⲱⲡ̣[ⲉ ⲉⲃⲟⲗ ϩⲛ̅ <text:line-break/><text:span text:style-name="T1"> </text:span><text:span text:style-name="T2">(77/30) </text:span> [.....] ⲛ̅ⲧ[ <text:line-break/><text:span text:style-name="T1"> </text:span><text:span text:style-name="T2">(77/31) </text:span> [.....]..[ <text:line-break/><text:span text:style-name="T1"> </text:span><text:span text:style-name="T2">(78/1) </text:span> ⲉⲧⲡⲉ ⲛ̅ϭⲓ ⲟⲩⲡ̅ⲛ̅ⲁ̅ ⲁ[ⲩⲥ]ⲁⲛⲟⲩ‐ <text:line-break/><text:span text:style-name="T1"> </text:span><text:span text:style-name="T2">(78/2) </text:span> ϣϥ̅ ϩⲛ̅ ⲙ̅ⲡⲏⲩⲉ ⲁϥϫⲓ ⲡⲉⲟⲟⲩ <text:line-break/><text:span text:style-name="T1"> </text:span><text:span text:style-name="T2">(78/3) </text:span> ⲙ̅ⲡⲏ ⲉⲧⲙ̅ⲙⲁⲩ ⲙⲛ̅ ϯϭⲟⲙ· ⲁϥ{ⲉ̅ⲓ} <text:line-break/><text:span text:style-name="T1"> </text:span><text:span text:style-name="T2">(78/4) </text:span> ⲉϫⲛ̅ ⲕⲟⲩⲛ̅ⲧⲥ̅ ⲛ̅ⲧⲉϥⲙⲁⲁⲩ· <text:line-break/><text:span text:style-name="T1"> </text:span><text:span text:style-name="T2">(78/5) </text:span> ⲁⲩⲱ ⲛ̅ϯϩⲉ ⲁϥ{ⲉ̅ⲓ} ⲉϫⲙ̅ ⲡⲓⲙⲟⲟⲩ· <text:line-break/><text:span text:style-name="T1"> </text:span><text:span text:style-name="T2">(78/6) </text:span> ϯⲙⲉϩⲥⲛ̅ⲧⲉ ⲇⲉ ⲙ̅ⲙⲛ̅ⲧⲣ̅ⲣⲟ ϫⲱ <text:line-break/><text:span text:style-name="T1"> </text:span><text:span text:style-name="T2">(78/7) </text:span> ⲙ̅ⲙⲟⲥ ⲉⲧⲃⲏⲏⲧϥ̅ ϫⲉ ⲁϥϣⲱⲡⲉ <text:line-break/><text:span text:style-name="T1"> </text:span><text:span text:style-name="T2">(78/8) </text:span> ⲉⲃⲟⲗ ϩⲛ̅ ⲟⲩⲛⲟϭ ⲙ̅ⲡⲣⲟⲫⲏⲧⲏⲥ· <text:line-break/><text:span text:style-name="T1"> </text:span><text:span text:style-name="T2">(78/9) </text:span> ⲁⲩⲱ ⲁϥ{ⲉ̅ⲓ} ⲛ̅ϭⲓ ⲟⲩϩⲁⲗⲏⲧ’ ⲁϥϥⲓ <text:line-break/><text:span text:style-name="T1"> </text:span><text:span text:style-name="T2">(78/10) </text:span> ⲡⲓⲁⲗⲟⲩ ⲉⲧⲁⲩϫ̣ⲡ̣ⲟϥ ⲁϥϫⲓⲧϥ̅ <text:line-break/><text:span text:style-name="T1"> </text:span><text:span text:style-name="T2">(78/11) </text:span> ⲉϩⲟⲩⲛ ⲉⲩⲧⲟⲟⲩ ⲉϥϫⲟⲥⲉ· <text:line-break/><text:span text:style-name="T1"> </text:span><text:span text:style-name="T2">(78/12) </text:span> ⲁⲩⲱ ⲁⲩⲥⲁⲛⲟⲩϣϥ̅ ⲉⲃⲟⲗ ϩⲙ̅ <text:line-break/><text:span text:style-name="T1"> </text:span><text:span text:style-name="T2">(78/13) </text:span> ⲡⲓϩⲁⲗⲏⲧ’ ⲛ̅ⲧⲉ ⲧⲡⲉ· ⲁⲩⲁⲅ’ⲅⲉ‐ <text:line-break/><text:span text:style-name="T1"> </text:span><text:span text:style-name="T2">(78/14) </text:span> ⲗⲟⲥ {ⲉ̅ⲓ} ⲉⲃⲟⲗ ⲙ̅ⲙⲁⲩ ⲡⲉϫⲁϥ ⲛⲁ[ϥ] <text:line-break/><text:span text:style-name="T1"> </text:span><text:span text:style-name="T2">(78/15) </text:span> ϫⲉ ⲧⲱⲟⲩⲛⲅ̅ ⲁⲡⲛⲟⲩⲧⲉ ϯ ⲉⲟⲟⲩ <text:line-break/><text:span text:style-name="T1"> </text:span><text:span text:style-name="T2">(78/16) </text:span> ⲛⲁⲕ· ⲁϥϫⲓ ⲛ̅ⲟⲩⲉⲟⲟⲩ ⲙⲛ̅ ⲟⲩϫⲣⲟ· <text:line-break/><text:span text:style-name="T1"> </text:span><text:span text:style-name="T2">(78/17) </text:span> ⲁⲩⲱ ⲛ̅ϯϩⲉ ⲁϥ{ⲉ̅ⲓ} ⲉϫⲙ̅ ⲡⲓⲙⲟⲟⲩ· <text:line-break/><text:span text:style-name="T1"> </text:span><text:span text:style-name="T2">(78/18) </text:span> ϯⲙⲉϩϣⲟⲙⲧⲉ ⲙ̅ⲙⲛ̅ⲧⲣ̅ⲣⲟ ϫⲱ <text:line-break/><text:span text:style-name="T1"> </text:span><text:span text:style-name="T2">(78/19) </text:span> ⲙ̅ⲙⲟⲥ ⲉⲣⲟϥ ϫⲉ ⲁϥϣⲱⲡⲉ ⲉⲃⲟⲗ <text:line-break/><text:span text:style-name="T1"> </text:span><text:span text:style-name="T2">(78/20) </text:span> ϩⲛ̅ ⲟⲩⲙⲏⲧⲣⲁ ⲙ̅ⲡⲁⲣⲑⲉⲛⲟⲥ <text:line-break/><text:span text:style-name="T1"> </text:span><text:span text:style-name="T2">(78/21) </text:span> ⲁⲩⲛⲟϫϥ̅ ⲉⲃⲟⲗ ϩⲛ̅ ⲧⲉϥⲡⲟⲗⲓⲥ <text:line-break/><text:span text:style-name="T1"> </text:span><text:span text:style-name="T2">(78/22) </text:span> ⲛ̅ⲧⲟϥ ⲙⲛ̅ ⲧⲉϥⲙⲁⲁⲩ ⲁⲩϫⲓⲧϥ̅ <text:line-break/><text:span text:style-name="T1"> </text:span><text:span text:style-name="T2">(78/23) </text:span> ⲉⲩⲙⲁ ⲛ̅ⲉⲣⲏⲙⲟⲥ· ⲁϥⲥⲁⲛⲟⲩ‐ <text:line-break/><text:span text:style-name="T1"> </text:span><text:span text:style-name="T2">(78/24) </text:span> ϣϥ̅ ⲙ̅ⲙⲁⲩ· ⲁϥ{ⲉ̅ⲓ} ⲁϥϫⲓ ⲛ̅ⲟⲩⲉ‐ <text:line-break/><text:span text:style-name="T1"> </text:span><text:span text:style-name="T2">(78/25) </text:span> [ⲟ]ⲟⲩ ⲙⲛ̅ ⲟⲩϭⲟⲙ· ⲁⲩⲱ ⲛ̅ϯ‐ <text:line-break/><text:span text:style-name="T1"> </text:span><text:span text:style-name="T2">(78/26) </text:span> [ϩⲉ] ⲁϥ{ⲉ̅ⲓ} ⲉϫⲙ̅ ⲡⲓⲙⲟⲟⲩ· <text:line-break/><text:span text:style-name="T1"> </text:span><text:span text:style-name="T2">(78/27) </text:span> [ϯ]ⲙ̣ⲉ̣ϩ̣[ϥ]ⲧ̣[ⲟ]ⲉ̣ ⲙ̅[ⲙ]ⲛ̅ⲧⲣ̅ⲣⲟ ϫ̣[ⲱ] <text:line-break/><text:span text:style-name="T1"> </text:span><text:span text:style-name="T2">(78/28) </text:span> ⲙ̅ⲙⲟⲥ ⲉⲣⲟϥ ϫ]ⲉ̣ ⲁϥϣⲱ[ⲡⲉ] <text:line-break/><text:span text:style-name="T1"> </text:span><text:span text:style-name="T2">(78/29) </text:span> [ⲉⲃⲟⲗ ϩⲛ̅ ⲟⲩⲡⲁⲣ]ⲑⲉ[ⲛⲟⲥ <text:line-break/><text:span text:style-name="T1"> </text:span><text:span text:style-name="T2">(78/30) </text:span> [ 9+- ]ⲧ̣ ⲁⲥ[ⲟⲗⲟⲙⲱⲛ] <text:line-break/><text:span text:style-name="T1"> </text:span><text:span text:style-name="T2">(79/1) </text:span> [ⲕ]ⲱ̣ⲧ̣ⲉ̣ [ⲛ̅]ⲥⲱⲥ ⲛ̅ⲧⲟϥ ⲙⲛ̅ ⲫ̅ⲏ̅ⲣ̅ⲥ̅ⲁ̅ⲗ̅ⲱ̣̅̅ <text:line-break/><text:span text:style-name="T1"> </text:span><text:span text:style-name="T2">(79/2) </text:span> ⲙⲛ̅ ⲥ̅ⲁ̅ⲩ̅ⲏ̅ⲗ̅ ⲙⲛ̅ ⲛⲉϥⲥⲧⲣⲁⲧⲓⲁ <text:line-break/><text:span text:style-name="T1"> </text:span><text:span text:style-name="T2">(79/3) </text:span> ⲉⲧⲁⲩⲧⲁⲟⲩⲟⲟⲩ· ⲁⲥⲟⲗⲟⲙⲱⲛ <text:line-break/><text:soft-page-break/><text:span text:style-name="T1"> </text:span><text:span text:style-name="T2">(79/4) </text:span> ϩⲱⲱϥ ⲧⲁⲩⲟ ⲛ̅ⲧⲉϥⲥⲧⲣⲁⲧⲓⲁ ⲛ̅‐ <text:line-break/><text:span text:style-name="T1"> </text:span><text:span text:style-name="T2">(79/5) </text:span> ⲧⲉ ⲛⲓⲇⲁⲓⲙⲱⲛ ⲉⲕⲱⲧⲉ ⲛ̅ⲥⲁ ϯ‐ <text:line-break/><text:span text:style-name="T1"> </text:span><text:span text:style-name="T2">(79/6) </text:span> ⲡⲁⲣⲑⲉⲛⲟⲥ· ⲁⲩⲱ ⲙ̅ⲡⲟⲩϭⲙ̅ <text:line-break/><text:span text:style-name="T1"> </text:span><text:span text:style-name="T2">(79/7) </text:span> ⲧⲏ ⲉⲧⲟⲩⲕⲱⲧⲉ ⲛ̅ⲥⲱⲥ· ⲁⲗⲗⲁ <text:line-break/><text:span text:style-name="T1"> </text:span><text:span text:style-name="T2">(79/8) </text:span> ϯⲡⲁⲣⲑⲉⲛⲟⲥ ⲉⲧⲁⲩⲧⲁⲁⲥ ⲛⲁⲩ· <text:line-break/><text:span text:style-name="T1"> </text:span><text:span text:style-name="T2">(79/9) </text:span> ⲛ̅ⲧⲟⲥ ⲡⲉⲛⲧⲁⲩⲛ̅ⲧⲥ̅· ⲁϥϫⲓⲧⲥ̅ <text:line-break/><text:span text:style-name="T1"> </text:span><text:span text:style-name="T2">(79/10) </text:span> ⲛ̅ϭⲓ ⲥⲟⲗⲟⲙⲱ̣ⲛ· ⲁⲥⲉⲣ ⲃⲁⲕⲉ <text:line-break/><text:span text:style-name="T1"> </text:span><text:span text:style-name="T2">(79/11) </text:span> ⲛ̅ϭⲓ ϯⲡⲁⲣⲑ̣ⲉⲛⲟⲥ ⲁⲥⲙⲓⲥⲉ ⲙ̅‐ <text:line-break/><text:span text:style-name="T1"> </text:span><text:span text:style-name="T2">(79/12) </text:span> ⲡⲓⲁⲗⲟⲩ ⲙ̅ⲡⲙⲁ ⲉⲧⲙ̅ⲙⲁⲩ· <text:line-break/><text:span text:style-name="T1"> </text:span><text:span text:style-name="T2">(79/13) </text:span> ⲁⲥⲥⲁⲛⲟⲩϣϥ̅ ϩⲛ̅ ⲟⲩϣⲱⲗϩ̅ <text:line-break/><text:span text:style-name="T1"> </text:span><text:span text:style-name="T2">(79/14) </text:span> ⲛ̅ⲧⲉ ⲧⲉⲣⲏⲙⲟⲥ· ⲛ̅ⲧⲉ‐ <text:line-break/><text:span text:style-name="T1"> </text:span><text:span text:style-name="T2">(79/15) </text:span> [ⲣ]ⲟ̣ⲩⲥⲁⲛⲟⲩϣϥ̅ ⲁϥϫⲓ ⲛ̅ⲟⲩⲉⲟ‐ <text:line-break/><text:span text:style-name="T1"> </text:span><text:span text:style-name="T2">(79/16) </text:span> ⲟ̣ⲩ ⲙⲛ̅ ⲟⲩϭⲟⲙ ⲉⲃⲟⲗ ϩⲛ̅ ϯⲥⲡⲟ‐ <text:line-break/><text:span text:style-name="T1"> </text:span><text:span text:style-name="T2">(79/17) </text:span> ⲣⲁ ⲉⲧⲁⲩϫⲡⲟϥ ⲉⲃⲟⲗ ⲛ̅ϩⲏⲧⲥ̅ <text:line-break/><text:span text:style-name="T1"> </text:span><text:span text:style-name="T2">(79/18) </text:span> ⲁⲩⲱ ⲛ̅ϯϩⲉ ⲁϥ{ⲉ̅ⲓ} ⲉϫⲙ̅ ⲡⲓ‐ <text:line-break/><text:span text:style-name="T1"> </text:span><text:span text:style-name="T2">(79/19) </text:span> ʹ26ⲙⲟⲟⲩ· ϯⲙⲉϩϯ ⲇⲉ ⲙ̅ⲙⲛ̅‐ <text:line-break/><text:span text:style-name="T1"> </text:span><text:span text:style-name="T2">(79/20) </text:span> ⲧⲣ̅ⲣⲟ ϫⲱ ⲙ̅ⲙⲟⲥ ⲉⲣⲟϥ ϫⲉ <text:line-break/><text:span text:style-name="T1"> </text:span><text:span text:style-name="T2">(79/21) </text:span> ⲁϥϣⲱⲡⲉ ⲉⲃⲟⲗ ϩⲛ̅ ⲟⲩⲧⲗ̅‐ <text:line-break/><text:span text:style-name="T1"> </text:span><text:span text:style-name="T2">(79/22) </text:span> ϯⲗⲉ ⲛ̅ⲧⲉ ⲧⲡⲉ· ⲁⲩⲥⲁⲧϥ̅ <text:line-break/><text:span text:style-name="T1"> </text:span><text:span text:style-name="T2">(79/23) </text:span> ⲉⲑⲁⲗⲁⲥⲥⲁ ⲁⲡⲛⲟⲩⲛ <text:line-break/><text:span text:style-name="T1"> </text:span><text:span text:style-name="T2">(79/24) </text:span> ϣⲟⲡϥ̅ ⲉⲣⲟϥ ⲁϥϫⲡⲟϥ <text:line-break/><text:span text:style-name="T1"> </text:span><text:span text:style-name="T2">(79/25) </text:span> ⲁϥⲟⲗϥ̅ ⲉⲧⲡⲉ ⲁϥϫⲓ ⲛ̅ⲟⲩⲉ‐ <text:line-break/><text:span text:style-name="T1"> </text:span><text:span text:style-name="T2">(79/26) </text:span> ⲟⲟⲩ ⲙⲛ̅ ⲟⲩϭⲟⲙ· ⲁⲩⲱ <text:line-break/><text:span text:style-name="T1"> </text:span><text:span text:style-name="T2">(79/27) </text:span> ⲛ̅ϯϩⲉ ⲁϥ{ⲉ̅[̅ⲓ}] ⲉϫⲙ̅ [ⲡⲓⲙⲟⲟⲩ·] <text:line-break/><text:span text:style-name="T1"> </text:span><text:span text:style-name="T2">(79/28) </text:span> [ϯ]ⲙ̣ⲉϩⲥⲟ ⲇ̣[ⲉ] ⲙ̅[ⲙ]ⲛ̅ⲧⲣ̅ⲣ[ⲟ] <text:line-break/><text:span text:style-name="T1"> </text:span><text:span text:style-name="T2">(79/29) </text:span> [ϫⲱ] ⲙ̣̅ⲙⲟⲥ [ϫⲉ ⲟ]ⲩⲙⲛ̅ⲧ̣[.]. <text:line-break/><text:span text:style-name="T1"> </text:span><text:span text:style-name="T2">(79/30) </text:span> [....] ⲉⲧ [..ⲉϩⲣ]ⲁⲓ̈ ⲉⲡⲓⲉ̅ⲱ̅ⲛ̅ <text:line-break/><text:span text:style-name="T1"> </text:span><text:span text:style-name="T2">(80/1) </text:span> ⲉⲧ’ⲥⲁϩⲣⲁⲓ̈ ϫⲉ ⲉϥⲉⲧ[ⲟⲟⲩ]ⲧⲉ ⲛ‐ <text:line-break/><text:span text:style-name="T1"> </text:span><text:span text:style-name="T2">(80/2) </text:span> ϩⲉⲛϩⲣⲏⲣⲉ· ⲁⲥⲱⲱ͂ ⲉⲃⲟⲗ ϩⲛ̅ <text:line-break/><text:span text:style-name="T1"> </text:span><text:span text:style-name="T2">(80/3) </text:span> ⲧⲉⲡⲓⲑⲩⲙⲓⲁ ⲛ̅ⲛⲓϩⲣⲉⲣⲉ ⲁⲥ‐ <text:line-break/><text:span text:style-name="T1"> </text:span><text:span text:style-name="T2">(80/4) </text:span> ⲙⲉⲥⲧϥ̅ ⲙ̅ⲡⲧⲟⲡⲟⲥ ⲉⲧⲙ̅ⲙⲁⲩ <text:line-break/><text:span text:style-name="T1"> </text:span><text:span text:style-name="T2">(80/5) </text:span> ⲁⲛⲁⲅ’ⲅⲉⲗⲟⲥ ⲥⲁⲛⲟⲩϣϥ̅ ⲛ̅‐ <text:line-break/><text:span text:style-name="T1"> </text:span><text:span text:style-name="T2">(80/6) </text:span> ⲧⲉ ⲡⲓⲁⲛⲑⲉⲱⲛⲟⲥ ⲁϥϫⲓ ⲛ̅‐ <text:line-break/><text:span text:style-name="T1"> </text:span><text:span text:style-name="T2">(80/7) </text:span> ⲟⲩⲉⲟⲟⲩ ⲙ̅ⲡⲙⲁ ⲉⲧⲙ̅ⲙⲁⲩ <text:line-break/><text:span text:style-name="T1"> </text:span><text:span text:style-name="T2">(80/8) </text:span> ⲙⲛ̅ ⲟⲩϭⲟⲙ· ⲁⲩⲱ ⲛ̅ϯϩⲉ ⲁϥ{ⲉ̅ⲓ} <text:line-break/><text:span text:style-name="T1"> </text:span><text:span text:style-name="T2">(80/9) </text:span> ⲉϫⲙ̅ ⲡⲓⲙⲟⲟⲩ· ϯⲙⲉϩ‐ <text:line-break/><text:span text:style-name="T1"> </text:span><text:span text:style-name="T2">(80/10) </text:span> ʹ26ⲥⲁϣϥⲉ ⲇⲉ ⲙ̅ⲙⲛ̣̅[ⲧ]ⲣ̅ⲣⲟ ϫⲱ ⲙ̅‐ <text:line-break/><text:span text:style-name="T1"> </text:span><text:span text:style-name="T2">(80/11) </text:span> ⲙⲟⲥ ⲉⲣⲟϥ ϫⲉ ⲟⲩⲧⲗ̅ϯⲗⲉ ⲡⲉ <text:line-break/><text:span text:style-name="T1"> </text:span><text:span text:style-name="T2">(80/12) </text:span> ⲁⲥ{ⲉ̅ⲓ} ⲉⲃⲟⲗ ϩⲛ̅ ⲧⲡⲉ ⲉϫⲙ̅ ⲡⲕⲁϩ <text:line-break/><text:span text:style-name="T1"> </text:span><text:span text:style-name="T2">(80/13) </text:span> ⲁⲩϫⲓⲧϥ̅ ⲉϩⲣⲁⲓ̈ ⲉϩⲉⲛⲃⲏⲃ ⲛ̅ϭⲓ̣ <text:line-break/><text:span text:style-name="T1"> </text:span><text:span text:style-name="T2">(80/14) </text:span> ϩⲉⲛⲇⲣⲁⲕⲱⲛ ⲁϥϣⲱⲡⲉ ⲛ̅ⲟⲩ‐ <text:line-break/><text:span text:style-name="T1"> </text:span><text:span text:style-name="T2">(80/15) </text:span> ⲁⲗⲟⲩ· ⲁⲩⲡ̅ⲛ̅ⲁ̅ {ⲉⲓ} ⲉϫⲱϥ ⲁϥ‐ <text:line-break/><text:span text:style-name="T1"> </text:span><text:span text:style-name="T2">(80/16) </text:span> ϫⲓⲧϥ̅ ⲉⲡϫⲓⲥⲉ ⲉⲡⲙⲁ ⲉⲧⲁϯ‐ <text:line-break/><text:span text:style-name="T1"> </text:span><text:span text:style-name="T2">(80/17) </text:span> ⲧⲗ̅ϯⲗⲉ ϣⲱⲡⲉ ⲉⲃⲟⲗ ⲙ̅ⲙⲁⲩ <text:line-break/><text:span text:style-name="T1"> </text:span><text:span text:style-name="T2">(80/18) </text:span> ⲁϥϫⲓ ⲛ̅ⲟⲩⲉⲟⲟⲩ ⲙⲛ̅ ⲟⲩϭⲟⲙ <text:line-break/><text:span text:style-name="T1"> </text:span><text:span text:style-name="T2">(80/19) </text:span> ⲙ̅ⲡⲙⲁ ⲉⲧⲙ̅ⲙⲁⲩ· ⲁⲩⲱ ⲛ̅ϯϩ̣[ⲉ] <text:line-break/><text:span text:style-name="T1"> </text:span><text:span text:style-name="T2">(80/20) </text:span> ⲁϥ{ⲉ̅ⲓ} ⲉϫⲙ̅ ⲡⲓⲙⲟⲟⲩ· ϯⲙⲉϩ‐ <text:line-break/><text:soft-page-break/><text:span text:style-name="T1"> </text:span><text:span text:style-name="T2">(80/21) </text:span> ʹ26ϣⲙⲟⲩⲛⲉ ⲇⲉ ⲙ̅ⲙⲛ̅ⲧⲣ̅ⲣⲟ ϫⲱ ⲙ̅‐ <text:line-break/><text:span text:style-name="T1"> </text:span><text:span text:style-name="T2">(80/22) </text:span> ⲙⲟⲥ ⲉⲣⲟϥ ϫⲉ ⲁⲩⲕⲗⲟⲟⲗⲉ {ⲉ̅ⲓ} <text:line-break/><text:span text:style-name="T1"> </text:span><text:span text:style-name="T2">(80/23) </text:span> ⲉϫⲙ̅ ⲡⲕⲁϩ ⲁⲥⲕⲱⲧⲉ ⲛ̅ⲟⲩ‐ <text:line-break/><text:span text:style-name="T1"> </text:span><text:span text:style-name="T2">(80/24) </text:span> ⲡ̣ⲉⲧⲣⲁ ⲉϩⲟⲩⲛ ⲁϥϣⲱⲡⲉ <text:line-break/><text:span text:style-name="T1"> </text:span><text:span text:style-name="T2">(80/25) </text:span> [ⲉ]ⲃⲟⲗ ⲛ̅ϩⲏⲧⲥ̅· ⲁⲩⲥⲁⲛⲟⲩϣϥ̅ <text:line-break/><text:span text:style-name="T1"> </text:span><text:span text:style-name="T2">(80/26) </text:span> [ⲛ̅]ϭ[ⲓ ⲛⲓⲁⲅ’ⲅ]ⲉⲗⲟⲥ ⲛⲏ ⲉⲧ’{ϩ̅ⲓ}[ϫ]ⲛ̣̅ <text:line-break/><text:span text:style-name="T1"> </text:span><text:span text:style-name="T2">(80/27) </text:span> [ϯⲕ]ⲗ̣ⲟⲟⲗ[ⲉ·] ⲁ̣ϥ̣[ϫⲓ] ⲛ̅ⲟⲩⲉⲟ̣[ⲟⲩ] <text:line-break/><text:span text:style-name="T1"> </text:span><text:span text:style-name="T2">(80/28) </text:span> ⲙ̣[ⲛ̅] ⲟ̣ⲩϭⲟ̣ⲙ̣ [ⲙ̅]ⲡ̣ⲙⲁ [ⲉⲧⲙ̅ⲙⲁⲩ·] <text:line-break/><text:span text:style-name="T1"> </text:span><text:span text:style-name="T2">(80/29) </text:span> ⲁⲩⲱ ⲛ̣̅[ϯϩⲉ ⲁϥ]{ⲉ̣̅̅ⲓ̣̅} ⲉ[ϫⲙ̅ ⲡⲓⲙⲟⲟⲩ·] <text:line-break/><text:span text:style-name="T1"> </text:span><text:span text:style-name="T2">(81/1) </text:span> [ϯⲙ]ⲉ̣ϩ̣ⲯ̣[ⲓ]ⲧⲉ ⲇⲉ ⲙ̅ⲙⲛ̅ⲧⲣ̅ⲣⲟ ϫⲱ ⲙ̅‐ <text:line-break/><text:span text:style-name="T1"> </text:span><text:span text:style-name="T2">(81/2) </text:span> ⲙⲟⲥ ⲉⲣⲟϥ ϫⲉ ⲉⲃⲟⲗ ϩⲛ̅ ϯⲯⲓⲧⲉ <text:line-break/><text:span text:style-name="T1"> </text:span><text:span text:style-name="T2">(81/3) </text:span> ⲙ̅ⲡⲉⲣⲓⲇⲱⲛ ⲁⲟⲩ{ⲉ̅ⲓ} ⲡⲱⲣϫ̅ ⲉⲃⲟⲗ <text:line-break/><text:span text:style-name="T1"> </text:span><text:span text:style-name="T2">(81/4) </text:span> ⲁⲥ{ⲉ̅ⲓ} ⲉϫⲛ̅ ⲟⲩⲧⲟⲟⲩ ⲉϥϫⲟⲥⲉ ⲁⲥⲣ̅ <text:line-break/><text:span text:style-name="T1"> </text:span><text:span text:style-name="T2">(81/5) </text:span> ⲟⲩⲟⲉⲓϣ ⲉⲥϩⲙⲟⲟⲥ ⲙ̅ⲙⲁⲩ· ϩⲱⲥ‐ <text:line-break/><text:span text:style-name="T1"> </text:span><text:span text:style-name="T2">(81/6) </text:span> ⲧⲉ ⲛ̅ⲥⲣ̅ⲉⲡⲓⲑⲩⲙⲉⲓ ⲉⲣⲟⲥ ⲟⲩⲁⲁⲥ <text:line-break/><text:span text:style-name="T1"> </text:span><text:span text:style-name="T2">(81/7) </text:span> ϫ̣ⲉ ⲉⲥⲉϣⲱⲡⲉ ⲛ̅ϩⲟⲟⲩⲧ’ⲥ{ϩ̅ⲓ}ⲙⲉ <text:line-break/><text:span text:style-name="T1"> </text:span><text:span text:style-name="T2">(81/8) </text:span> ⲁⲥϫⲱⲕ ⲛ̅ⲧⲉⲥⲉⲡⲓⲑⲩⲙⲓⲁ ⲉⲃⲟⲗ <text:line-break/><text:span text:style-name="T1"> </text:span><text:span text:style-name="T2">(81/9) </text:span> ⲁⲥⲱ͂ ⲉⲃⲟⲗ ϩⲛ̅ ⲧ̣ⲉⲥⲉⲡⲓⲑⲩⲙⲓⲁ <text:line-break/><text:span text:style-name="T1"> </text:span><text:span text:style-name="T2">(81/10) </text:span> ⲁⲩϫⲡⲟϥ ⲁⲩⲥ[ⲁ]ⲛ̣ⲟⲩϣϥ̅ ⲛ̅ϭⲓ ⲛⲓ‐ <text:line-break/><text:span text:style-name="T1"> </text:span><text:span text:style-name="T2">(81/11) </text:span> [ⲁ]ⲅ’̣ⲅⲉⲗⲟⲥ ⲛⲏ ⲉⲧ’{ϩ̅ⲓ}ϫⲛ̅ ϯⲉⲡⲓⲑⲩⲙⲓⲁ <text:line-break/><text:span text:style-name="T1"> </text:span><text:span text:style-name="T2">(81/12) </text:span> ⲁⲩⲱ ⲁϥϫⲓ ⲛ̅ⲟⲩⲉⲟⲟⲩ ⲙ̅ⲡⲙⲁ <text:line-break/><text:span text:style-name="T1"> </text:span><text:span text:style-name="T2">(81/13) </text:span> [ⲉ]ⲧ̣ⲙ̅ⲙⲁⲩ ⲙⲛ̅ ⲟⲩϭⲟⲙ· ⲁⲩⲱ ⲛ̅‐ <text:line-break/><text:span text:style-name="T1"> </text:span><text:span text:style-name="T2">(81/14) </text:span> [ϯϩ]ⲉ ⲁϥ{ⲉ̅ⲓ} ⲉϫⲙ̅ ⲡⲓⲙⲟⲟⲩ· ϯⲙⲉϩ‐ <text:line-break/><text:span text:style-name="T1"> </text:span><text:span text:style-name="T2">(81/15) </text:span> [ⲙ]ⲏ̣ⲧⲉ ⲙ̅ⲙⲛ̅ⲧⲣ̅ⲣⲟ ϫⲱ ⲙ̅ⲙⲟⲥ ⲉⲣⲟϥ <text:line-break/><text:span text:style-name="T1"> </text:span><text:span text:style-name="T2">(81/16) </text:span> ϫⲉ ⲁⲡⲉϥⲛⲟⲩⲧⲉ ⲙⲉⲣⲉ ⲟⲩϭⲏⲡⲉ <text:line-break/><text:span text:style-name="T1"> </text:span><text:span text:style-name="T2">(81/17) </text:span> ⲛ̅ⲧⲉ ϯⲉⲡⲓⲑⲩⲙⲓⲁ ⲁϥϫⲡⲟ ⲙ̅ⲙⲟϥ <text:line-break/><text:span text:style-name="T1"> </text:span><text:span text:style-name="T2">(81/18) </text:span> ⲉϩⲣⲁⲓ̈ ⲉⲧⲉϥϭⲓϫ· ⲁⲩⲱ ⲁϥⲛⲟⲩϫⲉ <text:line-break/><text:span text:style-name="T1"> </text:span><text:span text:style-name="T2">(81/19) </text:span> [ⲉ]ϫⲛ̅ ϯⲕⲗⲟⲟⲗⲉ ⲉϩⲟⲩⲉ ⲉⲣⲟϥ <text:line-break/><text:span text:style-name="T1"> </text:span><text:span text:style-name="T2">(81/20) </text:span> ⲉ̣ⲃⲟⲗ ϩⲛ̅ ϯⲧⲗ̅ϯⲗⲉ ⲁⲩⲱ ⲁⲩ‐ <text:line-break/><text:span text:style-name="T1"> </text:span><text:span text:style-name="T2">(81/21) </text:span> ϫⲡⲟϥ· ⲁϥϫⲓ ⲛ̅ⲟⲩⲉⲟⲟⲩ ⲙⲛ̅ ⲟⲩ‐ <text:line-break/><text:span text:style-name="T1"> </text:span><text:span text:style-name="T2">(81/22) </text:span> [ϭ]ⲟⲙ ⲙ̅ⲡⲙⲁ ⲉⲧⲙ̅ⲙⲁⲩ· ⲁⲩⲱ <text:line-break/><text:span text:style-name="T1"> </text:span><text:span text:style-name="T2">(81/23) </text:span> ⲛ̣̅ϯϩⲉ ⲁϥ{ⲉ̅ⲓ} ⲉϫⲙ̅ ⲡⲓⲙⲟⲟⲩ· <text:line-break/><text:span text:style-name="T1"> </text:span><text:span text:style-name="T2">(81/24) </text:span> ϯⲙⲉϩⲙⲛ̅ⲧⲟⲩⲉ ⲇⲉ ⲙ̅ⲙⲛ̅‐ <text:line-break/><text:span text:style-name="T1"> </text:span><text:span text:style-name="T2">(81/25) </text:span> [ⲧ]ⲣ̅ⲣⲟ ϫⲱ ⲙ̅ⲙ̣ⲟⲥ ϫⲉ ⲁⲡⲓⲱ̣ⲧ̣ <text:line-break/><text:span text:style-name="T1"> </text:span><text:span text:style-name="T2">(81/26) </text:span> [ⲣ̅ⲉⲡ]ⲓ̣ⲑⲩ̣ⲙ̣ⲓ ⲉ̣[ⲧ]ⲉϥϣⲉⲉⲣ̣ⲉ̣ <text:line-break/><text:span text:style-name="T1"> </text:span><text:span text:style-name="T2">(81/27) </text:span> [ⲟⲩⲁⲁ]ⲧⲥ̅ ⲁⲥⲱⲱ͂ ϩⲱⲱⲥ ⲉⲃⲟ̣[ⲗ] <text:line-break/><text:span text:style-name="T1"> </text:span><text:span text:style-name="T2">(81/28) </text:span> [ϩⲙ̅ ⲡⲉ]ⲥⲉⲓⲱⲧ’ ⲁⲥⲛⲟⲩϫⲉ ⲙ̣̅[ <text:line-break/><text:span text:style-name="T1"> </text:span><text:span text:style-name="T2">(81/29) </text:span> [.....]ⲩ̣ ⲛ̣[..]ⲩⲙ̅ϩⲉⲟⲩ̣[ <text:line-break/><text:span text:style-name="T1"> </text:span><text:span text:style-name="T2">(82/1) </text:span> ⲛ̅ⲃⲟⲗ {ϩ̅ⲓ} ⲧⲉⲣⲏⲙⲟⲥ ⲁⲡⲁⲅ’ⲅⲉ‐ <text:line-break/><text:span text:style-name="T1"> </text:span><text:span text:style-name="T2">(82/2) </text:span> ⲗⲟⲥ ⲥⲁⲛⲟⲩϣϥ̅ ⲙ̅ⲡⲙⲁ ⲉ‐ <text:line-break/><text:span text:style-name="T1"> </text:span><text:span text:style-name="T2">(82/3) </text:span> ⲧⲙ̅ⲙⲁⲩ· ⲁⲩⲱ ⲛ̅ϯϩⲉ ⲁϥ{ⲉ̅ⲓ} ⲉ‐ <text:line-break/><text:span text:style-name="T1"> </text:span><text:span text:style-name="T2">(82/4) </text:span> ϫⲙ̅ ⲡⲓⲙⲟⲟⲩ· ϯⲙⲉϩ‐ <text:line-break/><text:span text:style-name="T1"> </text:span><text:span text:style-name="T2">(82/5) </text:span> ʹ26ⲙⲛ̅ⲧⲥⲛⲟⲟⲩⲥ ⲙ̅ⲙⲛ̅ⲧⲣ̅ⲣⲟ ϫⲱ <text:line-break/><text:span text:style-name="T1"> </text:span><text:span text:style-name="T2">(82/6) </text:span> ⲙ̅ⲙⲟⲥ ⲉⲣⲟϥ ϫⲉ ⲁϥϣⲱⲡⲉ ⲉⲃⲟⲗ <text:line-break/><text:span text:style-name="T1"> </text:span><text:span text:style-name="T2">(82/7) </text:span> ϩⲙ̅ ⲫⲱⲥⲧⲏⲣ ⲥⲛⲁⲩ· ⲁⲩⲥⲁ‐ <text:line-break/><text:span text:style-name="T1"> </text:span><text:span text:style-name="T2">(82/8) </text:span> ⲛⲟⲩϣϥ̅ ⲙ̅ⲙⲁⲩ· [ⲁ]ϥϫⲓ ⲛ̅ⲟⲩⲉⲟⲟⲩ <text:line-break/><text:span text:style-name="T1"> </text:span><text:span text:style-name="T2">(82/9) </text:span> ⲙⲛ̅ ⲟⲩϭⲟⲙ· ⲁⲩ[ⲱ] ⲛ̅ϯϩⲉ ⲁϥ{ⲉ̅ⲓ} <text:line-break/><text:soft-page-break/><text:span text:style-name="T1"> </text:span><text:span text:style-name="T2">(82/10) </text:span> ⲉϫⲙ̅ ⲡⲓⲙⲟⲟⲩ· ϯⲙⲉϩ‐ <text:line-break/><text:span text:style-name="T1"> </text:span><text:span text:style-name="T2">(82/11) </text:span> ʹ26ⲙⲛ̅ⲧ’ϣⲟⲙⲧⲉ ⲇⲉ ⲙ̅ⲙⲛ̅ⲧⲣ̅ⲣⲟ ϫⲱ <text:line-break/><text:span text:style-name="T1"> </text:span><text:span text:style-name="T2">(82/12) </text:span> ⲙ̅ⲙⲟⲥ ⲉⲣⲟϥ ϫⲉ ϭⲓⲛⲙⲓⲥⲉ ⲛⲓⲙ <text:line-break/><text:span text:style-name="T1"> </text:span><text:span text:style-name="T2">(82/13) </text:span> ⲛ̅ⲧⲉ ⲡⲉⲩⲁⲣⲭⲱⲛ ⲟⲩⲗⲟⲅⲟ[ⲥ ⲡⲉ·] <text:line-break/><text:span text:style-name="T1"> </text:span><text:span text:style-name="T2">(82/14) </text:span> ⲁⲩⲱ ⲁϥϫⲓ ⲛ̅ⲟⲩⲧⲱϣ ⲙ̅ⲡⲙ̣[ⲁ] <text:line-break/><text:span text:style-name="T1"> </text:span><text:span text:style-name="T2">(82/15) </text:span> ⲉⲧⲙ̅ⲙⲁⲩ ⲛ̅ϭⲓ ⲡⲉⲓ̈ⲗⲟⲅⲟⲥ· ⲁϥ‐ <text:line-break/><text:span text:style-name="T1"> </text:span><text:span text:style-name="T2">(82/16) </text:span> ϫⲓ ⲛ̅ⲟⲩⲉⲟⲟⲩ ⲙⲛ̅ ⲟⲩϭⲟⲙ· <text:line-break/><text:span text:style-name="T1"> </text:span><text:span text:style-name="T2">(82/17) </text:span> ⲁⲩⲱ ⲛ̅ϯϩⲉ ⲁϥ{ⲉ̅ⲓ} ⲉϫⲙ̅ ⲡⲓⲙⲟⲟⲩ <text:line-break/><text:span text:style-name="T1"> </text:span><text:span text:style-name="T2">(82/18) </text:span> {ϩ̅ⲓ}ⲛⲁ ϫⲉ ⲉⲩⲉⲧⲱⲧ’ ⲛ̅ⲧⲉⲡⲓⲑⲩ‐ <text:line-break/><text:span text:style-name="T1"> </text:span><text:span text:style-name="T2">(82/19) </text:span> ⲙⲓⲁ ⲛ̅ⲧⲉ ⲛⲉⲓ̈ϭⲟⲙ· ϯⲅⲉⲛⲉⲁ ⲇⲉ <text:line-break/><text:span text:style-name="T1"> </text:span><text:span text:style-name="T2">(82/20) </text:span> ⲛ̅ⲛⲁⲧⲣ̅ ⲣ̅ⲣⲟ ⲉϩⲣⲁⲓ̈ ⲉϫⲱⲥ ϫⲱ <text:line-break/><text:span text:style-name="T1"> </text:span><text:span text:style-name="T2">(82/21) </text:span> ⲙ̅ⲙⲟⲥ ϫⲉ ⲁⲡⲛⲟⲩⲧⲉ ⲥⲱⲧⲡ̅ <text:line-break/><text:span text:style-name="T1"> </text:span><text:span text:style-name="T2">(82/22) </text:span> ⲙ̅ⲙⲟϥ ⲉⲃⲟⲗ ϩⲛ̅ ⲛⲓⲉⲱⲛ ⲧⲏⲣⲟⲩ <text:line-break/><text:span text:style-name="T1"> </text:span><text:span text:style-name="T2">(82/23) </text:span> [ⲁ]ϥ̣ⲧⲣⲉ ⲟⲩⲅⲛⲱⲥⲓⲥ ⲛ̅ⲧⲉ ⲡⲓⲁⲧ’̣ <text:line-break/><text:span text:style-name="T1"> </text:span><text:span text:style-name="T2">(82/24) </text:span> [ϫ]ⲱϩⲙ̅ ⲛ̅ⲧⲉ ⲧⲙⲉ ϣⲱⲡⲉ ⲛ̅‐ <text:line-break/><text:span text:style-name="T1"> </text:span><text:span text:style-name="T2">(82/25) </text:span> [ϩⲏⲧ]ϥ̣̅ ⲡⲉϫⲁϥ̣ ϫⲉ ⲁϥ{ⲉ̅ⲓ} ⲉ[ⲃⲟⲗ] <text:line-break/><text:span text:style-name="T1"> </text:span><text:span text:style-name="T2">(82/26) </text:span> [ϩⲛ̅] ⲟ̣ⲩⲁⲏⲣ ⲛ̅ϣ̣ⲙ̣̅ⲙ̣ⲟ̣ ⲉ[ⲃⲟⲗ ϩⲛ̅] <text:line-break/><text:span text:style-name="T1"> </text:span><text:span text:style-name="T2">(82/27) </text:span> [ⲟⲩ]ⲛⲟϭ ⲛ̅ⲛⲉⲱⲛ ⲛ̅ϭⲓ [ⲡⲓ] <text:line-break/><text:span text:style-name="T1"> </text:span><text:span text:style-name="T2">(82/28) </text:span> [ⲛⲟϭ] ⲙ̅ⲫⲱⲥⲧⲏⲣ· ⲁⲩ[ⲱ ⲁϥⲧⲣⲉ] <text:line-break/><text:span text:style-name="T1"> </text:span><text:span text:style-name="T2">(83/1) </text:span> ⲧⲅⲉⲛ[ⲉ]ⲁ ⲛ̅ⲧⲉ ⲛⲓⲣⲱⲙⲉ ⲉⲧⲙ̅ⲙⲁⲩ <text:line-break/><text:span text:style-name="T1"> </text:span><text:span text:style-name="T2">(83/2) </text:span> ⲣ̅ ⲟⲩⲟⲉⲓⲛ ⲛⲏ ⲉⲧⲁϥⲥⲟⲧⲡⲟⲩ ⲛⲁϥ <text:line-break/><text:span text:style-name="T1"> </text:span><text:span text:style-name="T2">(83/3) </text:span> ϩⲱⲥⲧⲉ ⲛ̅ⲥⲉⲣ̅ ⲟⲩⲟⲉⲓⲛ ⲉϫⲙ̅ ⲡⲓ <text:line-break/><text:span text:style-name="T1"> </text:span><text:span text:style-name="T2">(83/4) </text:span> ⲉⲱⲛ ⲧⲏⲣϥ̅· ⲧⲟⲧⲉ ϯⲥⲡⲟⲣⲁ ⲛⲁϯ <text:line-break/><text:span text:style-name="T1"> </text:span><text:span text:style-name="T2">(83/5) </text:span> ⲟⲩⲃⲉ ϯϭⲟⲙ ⲛⲏ ⲉⲧⲛⲁϫⲓ ⲙ̅ⲡⲉϥ <text:line-break/><text:span text:style-name="T1"> </text:span><text:span text:style-name="T2">(83/6) </text:span> ⲣⲁⲛ {ϩ̅ⲓ}ϫⲙ̅ ⲡⲓⲙⲟⲟⲩ ⲁⲩⲱ ⲛ̅ⲧⲟⲧⲟⲩ <text:line-break/><text:span text:style-name="T1"> </text:span><text:span text:style-name="T2">(83/7) </text:span> ⲧ̣ⲏⲣⲟⲩ· ⲁⲩⲱ ⲟⲩⲛ̅ ⲟⲩⲕⲗⲟⲟⲗⲉ <text:line-break/><text:span text:style-name="T1"> </text:span><text:span text:style-name="T2">(83/8) </text:span> ⲛ̅ⲕⲁⲕⲉ ⲛ̅ⲛⲏⲩ ⲉϫⲱⲟⲩ· ⲧⲟⲧⲉ <text:line-break/><text:span text:style-name="T1"> </text:span><text:span text:style-name="T2">(83/9) </text:span> ⲥⲉⲛⲁⲱϣ ⲉⲃ̣[ⲟ]ⲗ ϩⲛ̅ ⲟⲩⲛⲟϭ ⲛ̅ⲥⲙⲏ <text:line-break/><text:span text:style-name="T1"> </text:span><text:span text:style-name="T2">(83/10) </text:span> ⲛ̅ϭⲓ ⲛⲓⲗⲁⲟⲥ ⲉ̣ⲩ̣ϫⲱ ⲙ̅ⲙⲟⲥ ϫⲉ <text:line-break/><text:span text:style-name="T1"> </text:span><text:span text:style-name="T2">(83/11) </text:span> ⲛⲁⲓ̈ⲁⲧⲥ̅ ⲛ̅ⲧⲯⲩⲭⲏ ⲛ̅ⲧⲉ ⲛⲓⲣⲱ <text:line-break/><text:span text:style-name="T1"> </text:span><text:span text:style-name="T2">(83/12) </text:span> ⲙⲉ ⲉⲧⲙ̅ⲙⲁⲩ ϫⲉ ⲁⲩⲥⲟⲩⲱⲛ <text:line-break/><text:span text:style-name="T1"> </text:span><text:span text:style-name="T2">(83/13) </text:span> ⲡⲛⲟⲩⲧⲉ ϩⲛ̅ ⲟⲩⲅⲛⲱⲥⲓⲥ ⲛ̅‐ <text:line-break/><text:span text:style-name="T1"> </text:span><text:span text:style-name="T2">(83/14) </text:span> [ⲧ]ⲉ̣ ⲧⲙⲉ· ⲥⲉⲛⲁⲱⲛϩ̅ ϣⲁ ⲛⲉ <text:line-break/><text:span text:style-name="T1"> </text:span><text:span text:style-name="T2">(83/15) </text:span> [ⲱ]ⲛ ⲛ̅ⲧⲉ ⲛⲉⲱⲛ ϫⲉ ⲙ̅ⲡⲟⲩ <text:line-break/><text:span text:style-name="T1"> </text:span><text:span text:style-name="T2">(83/16) </text:span> ⲧ̣ⲁ̣ⲕⲟ ϩⲛ̅ ⲧⲉⲩⲉⲡⲓⲑⲩⲙⲓⲁ <text:line-break/><text:span text:style-name="T1"> </text:span><text:span text:style-name="T2">(83/17) </text:span> ⲙⲛ̅ ⲛⲓⲁⲅ’ⲅⲉⲗⲟⲥ· ⲟⲩⲧⲉ ⲙ̅‐ <text:line-break/><text:span text:style-name="T1"> </text:span><text:span text:style-name="T2">(83/18) </text:span> ⲡⲟⲩϫⲉⲕ ⲛⲓϩⲃⲏⲩⲉ ⲛ̅ⲧⲉ ⲛⲓ <text:line-break/><text:span text:style-name="T1"> </text:span><text:span text:style-name="T2">(83/19) </text:span> ϭⲟⲙ ⲉⲃⲟⲗ· ⲁⲗⲗⲁ ⲁⲩⲁϩⲉⲣⲁⲧⲟⲩ <text:line-break/><text:span text:style-name="T1"> </text:span><text:span text:style-name="T2">(83/20) </text:span> ⲙ̅ⲡⲉϥⲙ̅ⲧⲟ ϩⲛ̅ ⲟⲩⲅⲛⲱⲥⲓⲥ <text:line-break/><text:span text:style-name="T1"> </text:span><text:span text:style-name="T2">(83/21) </text:span> ⲛ̅ⲧⲉ ⲡⲛⲟⲩⲧⲉ ⲛ̅ⲑⲉ ⲛ̅ⲟⲩⲟ <text:line-break/><text:span text:style-name="T1"> </text:span><text:span text:style-name="T2">(83/22) </text:span> ⲉⲓⲛ ⲉⲁϥ{ⲉ̅ⲓ} ⲉⲃⲟⲗ ϩⲛ̅ ⲟⲩⲕⲱ‐ <text:line-break/><text:span text:style-name="T1"> </text:span><text:span text:style-name="T2">(83/23) </text:span> ϩⲧ̅’ ⲙⲛ̅ ⲟⲩⲥⲛⲟϥ· ⲁⲛⲟⲛ ⲇⲉ <text:line-break/><text:span text:style-name="T1"> </text:span><text:span text:style-name="T2">(83/24) </text:span> ⲁⲛⲣ̅ ϩⲱⲃ ⲛⲓⲙ ϩⲛ̅ ⲟⲩⲙⲛ̅ⲧ’ⲁⲧ’‐ <text:line-break/><text:span text:style-name="T1"> </text:span><text:span text:style-name="T2">(83/25) </text:span> ϩⲏⲧ’ ⲛ̅ⲧⲉ ⲛⲓϭⲟⲙ· ⲁⲛϣⲟⲩ <text:line-break/><text:span text:style-name="T1"> </text:span><text:span text:style-name="T2">(83/26) </text:span> ϣⲟⲩ ⲙ̅ⲙⲟⲛ ϩⲛ̅ ⲧⲡⲁⲣⲁ‐ <text:line-break/><text:span text:style-name="T1"> </text:span><text:span text:style-name="T2">(83/27) </text:span> [ⲃⲁ]ⲥⲓⲥ ⲛ̅ⲧⲉ ⲛ̣ⲉⲛϩⲃⲏⲩⲉ̣ <text:line-break/><text:span text:style-name="T1"> </text:span><text:span text:style-name="T2">(83/28) </text:span> [ⲧⲏⲣ]ⲟ̣ⲩ ⲁⲛ̣ⲱϣ̣ ⲟⲩⲃⲉ [ⲡⲛⲟⲩ]‐ <text:line-break/><text:soft-page-break/><text:span text:style-name="T1"> </text:span><text:span text:style-name="T2">(83/29) </text:span> [ⲧ]ⲉ ⲛ̅ⲧⲉ [ⲧⲙⲉ] ϫ̣ⲉ ⲛⲉϥϩ̣ⲃⲏ̣[ⲩⲉ] <text:line-break/><text:span text:style-name="T1"> </text:span><text:span text:style-name="T2">(83/30) </text:span> [ⲧ]ⲏ̣ⲣ̣ⲟ̣[ⲩ ...].ⲁⲙ̣...[ <text:line-break/><text:span text:style-name="T1"> </text:span><text:span text:style-name="T2">(84/1) </text:span> ⲟⲩϣⲁ ⲉⲛⲉϩ ⲡⲉ· ⲛⲉⲓ̈ ϩ̣ⲁ̣ ⲛⲉⲛ‐ <text:line-break/><text:span text:style-name="T1"> </text:span><text:span text:style-name="T2">(84/2) </text:span> ⲡ̅ⲛ̅ⲁ̅· ⲁⲛⲉⲓⲙⲉ ⲅⲁⲣ ϯⲛⲟⲩ ϫⲉ <text:line-break/><text:span text:style-name="T1"> </text:span><text:span text:style-name="T2">(84/3) </text:span> ⲛⲉⲛⲯⲩⲭⲏ ⲛⲁⲙⲟⲩ ϩⲛ̅ ⲟⲩⲙⲟⲩ <text:line-break/><text:span text:style-name="T1"> </text:span><text:span text:style-name="T2">(84/4) </text:span> ⲧⲟⲧⲉ ⲁⲩⲥⲙⲏ ϣⲱⲡⲉ ϣⲁⲣⲟⲟⲩ <text:line-break/><text:span text:style-name="T1"> </text:span><text:span text:style-name="T2">(84/5) </text:span> ⲉⲥϫⲱ ⲙ̅ⲙⲟⲥ ϫⲉ ⲙⲓ̅ⲭ̅ⲉ̅ⲩ̅ ⲙⲛ̅‐ <text:line-break/><text:span text:style-name="T1"> </text:span><text:span text:style-name="T2">(84/6) </text:span> ⲙ̅ⲓ̅ⲭ̅ⲁ̅ⲣ̅ ⲙⲛ̅ ⲙ̅ⲛⲏⲥⲓⲛⲟⲩⲥ̅· ⲛⲏ <text:line-break/><text:span text:style-name="T1"> </text:span><text:span text:style-name="T2">(84/7) </text:span> ⲉⲧ’{ϩ̅ⲓ}ϫⲛ̅ ⲡⲓϫⲱⲕⲙ̅ ⲉⲧⲟⲩⲁⲁⲃ <text:line-break/><text:span text:style-name="T1"> </text:span><text:span text:style-name="T2">(84/8) </text:span> ⲙⲛ̅ ⲡⲓⲙⲟⲟⲩ ⲉ̣ⲧ̣ⲟⲛϩ̅ ϫⲉ ⲉⲧⲃⲉ <text:line-break/><text:span text:style-name="T1"> </text:span><text:span text:style-name="T2">(84/9) </text:span> ⲟⲩ ⲛⲉⲧⲉⲧⲛ̅ⲱ̣ϣ̣ ⲟⲩⲃⲉ ⲡⲛⲟⲩ‐ <text:line-break/><text:span text:style-name="T1"> </text:span><text:span text:style-name="T2">(84/10) </text:span> ⲧⲉ ⲉⲧⲟⲛϩ̅ ϩⲛ̅ ϩ̣[ⲉ]ⲛⲥⲙⲏ ⲛ̅ⲁⲛⲟ̣‐ <text:line-break/><text:span text:style-name="T1"> </text:span><text:span text:style-name="T2">(84/11) </text:span> ⲙⲟⲥ ⲙⲛ̅ ϩⲉⲛⲗⲁⲥ ⲉⲙⲛ̅ ⲛⲟⲙⲟ[ⲥ] <text:line-break/><text:span text:style-name="T1"> </text:span><text:span text:style-name="T2">(84/12) </text:span> ⲧⲉ ⲉⲧⲟⲟⲧⲟⲩ ⲙⲛ̅ ϩⲉⲛⲯⲩⲭⲏ <text:line-break/><text:span text:style-name="T1"> </text:span><text:span text:style-name="T2">(84/13) </text:span> ⲉⲩⲙⲉϩ ⲛ̅ⲥⲛⲟϥ ⲙⲛ̅ ϩⲉⲛϩ̣[ⲃⲏⲩⲉ] <text:line-break/><text:span text:style-name="T1"> </text:span><text:span text:style-name="T2">(84/14) </text:span> ⲉⲩⲥⲟⲟϥ· ⲉⲧⲉⲧⲛ̅ⲙⲉϩ ⲉ̣[ⲃⲟⲗ] <text:line-break/><text:span text:style-name="T1"> </text:span><text:span text:style-name="T2">(84/15) </text:span> ϩⲛ̅ ϩⲉⲛϩⲃⲏⲩⲉ ⲉⲛⲁ ⲧⲙⲉ ⲁⲛ ⲛⲉ̣ <text:line-break/><text:span text:style-name="T1"> </text:span><text:span text:style-name="T2">(84/16) </text:span> ⲁⲗⲗⲁ ⲛⲉⲧⲛ̅{ϩ̅ⲓ}ⲟⲟⲩⲉ ⲙⲉϩ ⲛ̅‐ <text:line-break/><text:span text:style-name="T1"> </text:span><text:span text:style-name="T2">(84/17) </text:span> ⲟⲩⲛⲟϥ ⲙⲛ̅ ⲡⲧⲉⲗⲏⲗ· ⲉⲁⲧⲉ‐ <text:line-break/><text:span text:style-name="T1"> </text:span><text:span text:style-name="T2">(84/18) </text:span> ⲧⲛ̅ϫⲉϩⲙ̅ ⲡⲓⲙⲟⲟⲩ ⲛ̅ⲧⲉ ⲡⲱⲛ[ϩ̅] <text:line-break/><text:span text:style-name="T1"> </text:span><text:span text:style-name="T2">(84/19) </text:span> ⲁⲧⲉⲧⲛ̅ⲥⲱⲕ ⲙ̅ⲙⲟϥ ⲉϩⲟⲩⲛ <text:line-break/><text:span text:style-name="T1"> </text:span><text:span text:style-name="T2">(84/20) </text:span> ⲉⲡⲟⲩⲱϣ ⲛ̅ⲧⲉ ⲛⲓϭⲟⲙ <text:line-break/><text:span text:style-name="T1"> </text:span><text:span text:style-name="T2">(84/21) </text:span> ⲛⲏ ⲉⲧⲁⲩϯ ⲧⲏⲩⲧⲛ̅ ⲉⲧⲟⲟ‐ <text:line-break/><text:span text:style-name="T1"> </text:span><text:span text:style-name="T2">(84/22) </text:span> ⲧⲟⲩ ϫⲉ ⲉⲧⲉⲧⲛ̅ⲉϣⲙ̅ϣⲉ <text:line-break/><text:span text:style-name="T1"> </text:span><text:span text:style-name="T2">(84/23) </text:span> ⲙ̅ⲙⲟⲟⲩ· ⲁⲩⲱ ⲙ̅ⲡⲉ{ⲡⲉ}‐ <text:line-break/><text:span text:style-name="T1"> </text:span><text:span text:style-name="T2">(84/24) </text:span> ⲧ̣ⲛ̅ⲙⲉⲉⲩⲉ ⲉⲓⲛⲉ ⲙ̅ⲡⲁ ⲛⲓ‐ <text:line-break/><text:span text:style-name="T1"> </text:span><text:span text:style-name="T2">(84/25) </text:span> [ⲣ]ⲱ̣ⲙⲉ ⲉⲧⲙ̅ⲙⲁⲩ ⲁⲛ ⲛⲏ <text:line-break/><text:span text:style-name="T1"> </text:span><text:span text:style-name="T2">(84/26) </text:span> [ⲉ]ⲧ̣ⲉⲧⲛ̅ⲡⲱ̣ⲧ̣ ⲛ̅ⲥ̣ⲱⲟ[ⲩ] <text:line-break/><text:span text:style-name="T1"> </text:span><text:span text:style-name="T2">(84/27) </text:span> [..]ⲡ̣ⲟⲩⲥ[. ].[.]ⲛ̣̅ⲥⲁ ⲛⲉ <text:line-break/><text:span text:style-name="T1"> </text:span><text:span text:style-name="T2">(84/28) </text:span> [.]ⲉⲡⲓⲑⲩⲙ̣[ⲓⲁ...]. ϩ̣ⲉ <text:line-break/><text:span text:style-name="T1"> </text:span><text:span text:style-name="T2">(85/1) </text:span> ⲙ̣ⲁ̣ⲣⲉⲡⲉⲩⲟⲩⲧⲁϩ ⲗⲱⲱⲙ· ⲁⲗⲗⲁ <text:line-break/><text:span text:style-name="T1"> </text:span><text:span text:style-name="T2">(85/2) </text:span> ⲥⲉⲛⲁϣⲱⲡⲉ ⲉⲩⲥⲟⲟⲩⲛ ⲙ̅ⲙⲟⲟⲩ <text:line-break/><text:span text:style-name="T1"> </text:span><text:span text:style-name="T2">(85/3) </text:span> ϣⲁ ⲛⲓⲛⲟϭ ⲛ̅ⲛⲉⲱⲛ· ϫⲉ ⲛⲓϣⲁϫⲉ <text:line-break/><text:span text:style-name="T1"> </text:span><text:span text:style-name="T2">(85/4) </text:span> ⲉⲧⲁⲩⲁⲣⲉϩ ⲉⲣⲟⲟⲩ ⲛ̅ⲧⲉ ⲡⲛⲟⲩⲧⲉ <text:line-break/><text:span text:style-name="T1"> </text:span><text:span text:style-name="T2">(85/5) </text:span> ⲛ̅ⲧⲉ ⲛⲉⲱⲛ ⲙ̅ⲡⲟⲩ{ϩ̅ⲓ}ⲧⲟⲩ ⲉ‐ <text:line-break/><text:span text:style-name="T1"> </text:span><text:span text:style-name="T2">(85/6) </text:span> ⲡϫⲱⲱⲙⲉ ⲟⲩⲧⲉ ⲛ̅ⲥⲉⲥϩⲏⲟⲩⲧ’ ⲁⲛ· <text:line-break/><text:span text:style-name="T1"> </text:span><text:span text:style-name="T2">(85/7) </text:span> ⲁⲗⲗⲁ ϩⲉⲛⲁⲅ’ⲅⲉⲗⲓⲕⲟⲥ ⲉⲧⲛⲁⲛ̅ⲧⲟⲩ <text:line-break/><text:span text:style-name="T1"> </text:span><text:span text:style-name="T2">(85/8) </text:span> ⲛⲁⲓ̈ ⲉⲧⲉ ⲛ̅ⲥⲉⲛⲁⲙ̅ⲙⲉ ⲉⲣⲟⲟⲩ ⲁⲛ ⲛ̅‐ <text:line-break/><text:span text:style-name="T1"> </text:span><text:span text:style-name="T2">(85/9) </text:span> ϭⲓ ⲛ̅ⲅⲉⲛⲉⲁ ⲧⲏ[ⲣⲟ]ⲩ ⲛ̅ⲛ̅ⲣⲱⲙⲉ· ⲥⲉ‐ <text:line-break/><text:span text:style-name="T1"> </text:span><text:span text:style-name="T2">(85/10) </text:span> ⲛⲁϣⲱⲡⲉ ⲅⲁ[ⲣ ⲉ]ϫⲛ̅ ⲟⲩⲧⲟⲟⲩ ⲉϥ‐ <text:line-break/><text:span text:style-name="T1"> </text:span><text:span text:style-name="T2">(85/11) </text:span> ϫⲟⲥⲉ {ϩ̅ⲓ}ϫⲛ̅ ⲟⲩ̣ⲡⲉⲧⲣⲁ ⲛ̅ⲧⲉ ⲧⲙⲉ· <text:line-break/><text:span text:style-name="T1"> </text:span><text:span text:style-name="T2">(85/12) </text:span> ⲉ̣ⲧⲃⲉ ⲡⲁⲓ̈ ⲥⲉⲛⲁϯ ⲣⲁⲛ ⲉⲣⲟⲟⲩ <text:line-break/><text:span text:style-name="T1"> </text:span><text:span text:style-name="T2">(85/13) </text:span> ϫⲉ ⲛⲓϣⲁϫⲉ ⲛ̅ⲧⲉ ϯⲁⲫⲑⲁⲣⲥⲓⲁ <text:line-break/><text:span text:style-name="T1"> </text:span><text:span text:style-name="T2">(85/14) </text:span> [ⲙⲛ̅ ϯ]ⲙⲛ̅ⲧⲙⲉ ⲛ̅ⲛⲏ ⲉⲧ’ⲥⲟⲟⲩⲛ <text:line-break/><text:span text:style-name="T1"> </text:span><text:span text:style-name="T2">(85/15) </text:span> [ⲙ̅]ⲡ̣ⲛⲟⲩⲧⲉ ⲛ̅ϣⲁ ⲉⲛⲉϩ ϩⲛ̅ ⲟⲩ‐ <text:line-break/><text:span text:style-name="T1"> </text:span><text:span text:style-name="T2">(85/16) </text:span> [ⲥ]ⲟⲫⲓⲁ ⲛ̅ⲧⲉ ⲟⲩⲅⲛⲱⲥⲓⲥ ⲙⲛ̅ <text:line-break/><text:span text:style-name="T1"> </text:span><text:span text:style-name="T2">(85/17) </text:span> ⲟ̣ⲩⲥⲃⲱ ⲛ̅ⲧⲉ ϩⲉⲛⲁⲅ’ⲅⲉⲗⲟⲥ ϣⲁ <text:line-break/><text:soft-page-break/><text:span text:style-name="T1"> </text:span><text:span text:style-name="T2">(85/18) </text:span> ⲉⲛⲉϩ ϫⲉ ϥⲥⲟⲟⲩⲛ ⲛ̅ϩⲱⲃ ⲛ̣ⲓⲙ· <text:line-break/><text:span text:style-name="T1"> </text:span><text:span text:style-name="T2">(85/19) </text:span> ʹ26ⲛⲁⲓ̈ ⲛⲉ ⲛⲓⲁⲡⲟⲕⲁⲗⲩⲯⲓⲥ ⲉⲧⲁ‐ <text:line-break/><text:span text:style-name="T1"> </text:span><text:span text:style-name="T2">(85/20) </text:span> [̅ⲁ̅]̅ⲇ̅ⲁ̅ⲙ̅ ϭⲁⲗⲡⲟⲩ ⲉⲃⲟⲗ ⲛ̅ⲥ̅ⲏⲑ̅ ⲡⲉϥ‐ <text:line-break/><text:span text:style-name="T1"> </text:span><text:span text:style-name="T2">(85/21) </text:span> ϣⲏⲣⲉ· ⲁⲩⲱ ⲁⲡⲉϥϣⲏⲣⲉ ⲧⲁⲙⲉ <text:line-break/><text:span text:style-name="T1"> </text:span><text:span text:style-name="T2">(85/22) </text:span> ⲧ̣ⲉϥⲥⲡ[ⲟ]ⲣⲁ ⲉⲣⲟⲟⲩ· ⲧⲁⲓ̈ ⲧⲉ ϯⲅⲛⲱ‐ <text:line-break/><text:span text:style-name="T1"> </text:span><text:span text:style-name="T2">(85/23) </text:span> ⲥⲓⲥ ⲛ̅ⲛⲁⲡⲟⲕⲣⲩⲫⲟⲛ ⲛ̅ⲧⲉ {2̅ⲁ̅ⲇ̅ⲁ̅ⲙ}2 <text:line-break/><text:span text:style-name="T1"> </text:span><text:span text:style-name="T2">(85/24) </text:span> ⲉⲧⲁϥⲧⲁⲁⲥ ⲛ̅ⲥ̅ⲏ̅ⲑ̅· ⲉⲧⲉ ⲡⲓϫⲱ‐ <text:line-break/><text:span text:style-name="T1"> </text:span><text:span text:style-name="T2">(85/25) </text:span> ⲕⲙ̅ ⲉⲧⲟⲩⲁⲁⲃ ⲡⲉ ⲛ̅ⲛⲏ ⲉⲧ’ⲥⲟ‐ <text:line-break/><text:span text:style-name="T1"> </text:span><text:span text:style-name="T2">(85/26) </text:span> ⲟⲩⲛ ⲛ̅ϯⲅⲛⲱⲥⲓⲥ ⲛ̅ⲉⲛⲉϩ ⲉⲃⲟ̣[ⲗ] <text:line-break/><text:span text:style-name="T1"> </text:span><text:span text:style-name="T2">(85/27) </text:span> {ϩ̅ⲓ}ⲧⲟⲟⲧⲟⲩ ⲛ̅ⲛⲓⲗⲟⲅⲟⲅⲉⲛⲏⲥ ⲙ̣[ⲛ̅] <text:line-break/><text:span text:style-name="T1"> </text:span><text:span text:style-name="T2">(85/28) </text:span> ⲛⲓⲫⲱⲥⲧⲏⲣ ⲛ̅ⲁ̣ⲧ’ⲧⲁⲕⲟ ⲛⲏ̣ [ⲉⲧⲁⲩ]‐ <text:line-break/><text:span text:style-name="T1"> </text:span><text:span text:style-name="T2">(85/29) </text:span> {ⲉ̅ⲓ} ⲉⲃⲟⲗ ϩⲛ̅ ϯⲥⲡ̣[ⲟ]ⲣⲁ ⲉⲧⲟⲩⲁ̣[ⲁⲃ] <text:line-break/><text:span text:style-name="T1"> </text:span><text:span text:style-name="T2">(85/30) </text:span> ⲓ̣̅̅̈̅ⲉ̅ⲥ̅ⲥ̅ⲉ̅ⲩ̅ⲥ̅ ⲙ̣̅ⲁ̣[ⲍ]ⲁⲣⲉⲩⲥ̣̅ [ⲓ̅̈ⲉⲥⲥⲉ̅ <text:line-break/><text:span text:style-name="T1"> </text:span><text:span text:style-name="T2">(85/31) </text:span> ⲇ̅ⲉ̅ⲕ̅ⲉ̅ⲩ̅ⲥ̣̅̅ [ⲡⲓ]ⲙ̣ⲟ̣ⲟⲩ ⲉⲧⲟ̣[ⲛϩ̅] <text:line-break/><text:span text:style-name="T1"> </text:span><text:span text:style-name="T2">(85/32) </text:span> ⲧⲁⲡ̣ⲟ̣[ⲕⲁⲗⲩ]ⲯ̣ⲓ̣ⲥ ⲛ̣̅ⲁ̣ⲇ̣[ⲁⲙ]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2:45:58.502763000</meta:creation-date>
    <meta:generator>LibreOffice/26.2.1.2$Windows_X86_64 LibreOffice_project/620$Build-2</meta:generator>
    <dc:date>2026-03-24T12:48:57.763631000</dc:date>
    <meta:editing-duration>PT2M59S</meta:editing-duration>
    <meta:editing-cycles>1</meta:editing-cycles>
    <meta:document-statistic meta:table-count="0" meta:image-count="0" meta:object-count="0" meta:page-count="54" meta:paragraph-count="10" meta:word-count="12243" meta:character-count="84852" meta:non-whitespace-character-count="65324"/>
  </office:meta>
</office:document-meta>
</file>