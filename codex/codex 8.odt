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Antinoou"/>
    </style:style>
    <style:style style:name="P2" style:family="paragraph" style:parent-style-name="Text_20_body">
      <style:text-properties style:font-name="Antinoou"/>
    </style:style>
    <style:style style:name="P3" style:family="paragraph" style:parent-style-name="Standard">
      <style:paragraph-properties fo:break-before="page"/>
      <style:text-properties style:font-name="Antinoou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VIII ) Zostrianos</text:p>
      <text:p text:style-name="P2"><text:span text:style-name="T1"> </text:span><text:span text:style-name="T2">(1/1) </text:span> [......]ⲉ ⲛⲧⲉ ⲡⲉ.[...] ⲛ ⲛⲓϣⲁϫⲉ <text:line-break/><text:span text:style-name="T1"> </text:span><text:span text:style-name="T2">(1/2) </text:span> [......]ⲟⲛϩ ϣⲁ ⲉⲛ̣[ⲉϩ] ⲛ̣ⲁⲓ̈ ⲁⲛⲟⲕ <text:line-break/><text:span text:style-name="T1"> </text:span><text:span text:style-name="T2">(1/3) </text:span> [.............]ⲩ ⲍⲱⲥ̣[ⲧⲣⲓⲁⲛ]‐ <text:line-break/><text:span text:style-name="T1"> </text:span><text:span text:style-name="T2">(1/4) </text:span> [ⲟⲥ .]..[....].ⲥ̅.[..]ⲓ̅ⲁ̅ ⲙⲛ ⲓ̅̈̅ⲟ̅ⲗ̅ⲁ̅ⲟ̅ⲥ̅ <text:line-break/><text:span text:style-name="T1"> </text:span><text:span text:style-name="T2">(1/5) </text:span> [ⲉⲧ]ⲁ̣ⲓ̣̈ϣⲱⲡⲉ ϩⲙ ⲡ[ⲓⲕ]ⲟⲥⲙⲟⲥ ⲛ ⲛⲁⲓ̈ <text:line-break/><text:span text:style-name="T1"> </text:span><text:span text:style-name="T2">(1/6) </text:span> [ⲉⲧ]ⲉ ⲛ ⲧⲁϭⲟⲧ’ ⲙⲛ [ⲛⲏ] ⲉⲧ’ⲙⲛⲛⲥⲱⲉⲓ <text:line-break/><text:span text:style-name="T1"> </text:span><text:span text:style-name="T2">(1/7) </text:span> [ⲛⲓ]ⲥ̣ⲱⲧⲡ’ ⲉⲧⲟⲛϩ· ϥⲟ̣ⲛϩ ⲛϭⲓ ⲡⲛⲟⲩⲧⲉ <text:line-break/><text:span text:style-name="T1"> </text:span><text:span text:style-name="T2">(1/8) </text:span> [....] ⲧⲙⲉ ϩⲛ ⲟⲩⲙⲛⲧⲙⲉ ⲛ ⲧⲁⲡⲙⲉ <text:line-break/><text:span text:style-name="T1"> </text:span><text:span text:style-name="T2">(1/9) </text:span> [ⲙⲛ ⲟ]ⲩⲥⲟⲟⲩⲛ ⲁⲛⲟⲕ ⲙⲛ 〈ⲟⲩ〉ⲟⲩⲟⲉⲓⲛ ϣⲁ <text:line-break/><text:span text:style-name="T1"> </text:span><text:span text:style-name="T2">(1/10) </text:span> [ⲉⲛ]ⲉϩ· ⲉⲧⲁⲉⲓⲡⲱⲣϫ ⲙ ⲡⲓⲥⲱⲙⲁⲧⲓ <text:line-break/><text:span text:style-name="T1"> </text:span><text:span text:style-name="T2">(1/11) </text:span> [ⲕ]ⲟⲛ ⲛ ⲕⲁⲕⲉ ⲉⲧⲛϩⲣⲁⲓ̈ ⲛϩⲏⲧ’· ⲙⲛ ⲡⲓ‐ <text:line-break/><text:span text:style-name="T1"> </text:span><text:span text:style-name="T2">(1/12) </text:span> [ⲯ]ⲩⲭⲓⲕⲟⲛ ⲛ ⲭⲁⲟⲩⲥ ϩⲛ ⲟⲩⲛⲟⲩⲥ <text:line-break/><text:span text:style-name="T1"> </text:span><text:span text:style-name="T2">(1/13) </text:span> ⲙ̣ⲛ ϯⲙⲛⲧ’ⲥϩⲓⲙⲉ ⲛⲛ ⲉⲡⲓⲑⲩⲙⲓⲁ <text:line-break/><text:span text:style-name="T1"> </text:span><text:span text:style-name="T2">(1/14) </text:span> [.]ⲁⲓ̈ ⲉⲧ’ϩⲛ ⲡⲓⲕⲁⲕⲉ· ⲉⲙⲡⲓⲣ ϩⲱⲃ ϭⲉ <text:line-break/><text:span text:style-name="T1"> </text:span><text:span text:style-name="T2">(1/15) </text:span> ⲉⲣⲟⲥ· ⲉⲧⲁ̣ⲉⲓϭⲓⲛⲉ ⲙ ⲡⲓⲁⲧⲛ ⲁⲣⲏϫϥ <text:line-break/><text:span text:style-name="T1"> </text:span><text:span text:style-name="T2">(1/16) </text:span> ⲛ̣ⲧⲉ ⲧⲁϩⲩⲗⲏ· ⲁⲩⲱ ⲁⲉⲓⲥⲟϩⲉ ⲛ ϯ‐ <text:line-break/><text:span text:style-name="T1"> </text:span><text:span text:style-name="T2">(1/17) </text:span> [ⲕⲧ]ⲓⲥⲓⲥ ⲉⲧ’ⲙⲟⲟⲩⲧ’ ⲉⲧ’ϩⲣⲁⲓ̈ ⲛϩⲏⲧ’ <text:line-break/><text:span text:style-name="T1"> </text:span><text:span text:style-name="T2">(1/18) </text:span> [ⲙ]ⲛ ⲡⲓⲕⲟⲥⲙⲟⲕⲣⲁⲧⲱⲣ ⲛ ⲛⲟⲩⲧⲉ <text:line-break/><text:span text:style-name="T1"> </text:span><text:span text:style-name="T2">(1/19) </text:span> ⲛⲛ ⲉⲥⲑⲏⲧⲟⲛ· ⲉⲁⲉ̣[ⲓ]ϯ ϩⲛ ⲟⲩϭⲟⲙ <text:line-break/><text:span text:style-name="T1"> </text:span><text:span text:style-name="T2">(1/20) </text:span> ⲛⲛ ⲟⲩ̣ⲟ̣ⲉⲓϣ ⲛⲧⲉ ⲡⲧⲏⲣϥ ⲛ ⲛⲏ ⲉ‐ <text:line-break/><text:span text:style-name="T1"> </text:span><text:span text:style-name="T2">(1/21) </text:span> ⲧⲛⲧⲁ̣[ⲩ] ⲙⲙⲁⲩ ⲙ ⲙⲉⲣⲓⲕⲟⲛ ⲛ ϣⲙ‐ <text:line-break/><text:span text:style-name="T1"> </text:span><text:span text:style-name="T2">(1/22) </text:span> ⲙⲟ· ⲉⲉⲓ̈ϩⲓ ⲧⲟⲟⲧ’ ⲉ ⲛⲉⲩϩⲃⲏⲩⲉ ⲛ <text:line-break/><text:span text:style-name="T1"> </text:span><text:span text:style-name="T2">(1/23) </text:span> ⲛⲁⲩ ⲟⲩⲕⲟⲩⲉⲓ· ⲙ ⲡⲣⲏⲧⲉ ⲉⲧⲁ‐ <text:line-break/><text:span text:style-name="T1"> </text:span><text:span text:style-name="T2">(1/24) </text:span> ϯⲁⲛⲁⲅⲕⲏ ⲛⲧⲉ ⲡⲓϫⲡⲟ ⲛ̣ⲧ’ ⲉ ⲡⲉ‐ <text:line-break/><text:span text:style-name="T1"> </text:span><text:span text:style-name="T2">(1/25) </text:span> ⲧⲟⲩⲟⲛϩ· ⲉⲙⲡⲓⲱ̣ⲕ ϩⲧⲏⲟⲩ ⲣⲱ <text:line-break/><text:span text:style-name="T1"> </text:span><text:span text:style-name="T2">(1/26) </text:span> ⲉⲛⲉϩ· ⲁⲗⲗⲁ ⲛ ⲟⲩⲟⲉⲓϣ ⲛⲓⲙ <text:line-break/><text:span text:style-name="T1"> </text:span><text:span text:style-name="T2">(1/27) </text:span> ⲛⲉⲓ̈ⲡⲱⲣϫ ⲙⲙⲟⲓ̈ ⲛⲥⲁⲃⲟⲗ ⲙⲙⲟⲟⲩ <text:line-break/><text:span text:style-name="T1"> </text:span><text:span text:style-name="T2">(1/28) </text:span> ⲉ̣ⲓ̣̈ϣ̣ⲱⲡⲉ ⲉⲃⲟⲗ ϩⲓⲧⲟⲟⲧϥ ⲛ ⲟⲩ‐ <text:line-break/><text:span text:style-name="T1"> </text:span><text:span text:style-name="T2">(1/29) </text:span> [..]ⲥ̣ⲉ ⲉϥⲟⲩⲁⲁⲃ· ⲁⲩⲱ ⲉϥⲙⲟϫϭ <text:line-break/><text:span text:style-name="T1"> </text:span><text:span text:style-name="T2">(1/30) </text:span> [ⲉ]ⲧⲁⲓ̈ⲥⲟⲟⲩⲧⲛ ⲛ ⲧⲁⲯⲩⲭⲏ ⲛⲛ ⲁⲧ’‐ <text:line-break/><text:span text:style-name="T1"> </text:span><text:span text:style-name="T2">(1/31) </text:span> ⲕⲁϭⲓⲁ ⲉⲃⲟⲗ· ⲁⲩⲱ ⲁⲉⲓϯ ϭⲟⲙ <text:line-break/><text:span text:style-name="T1"> </text:span><text:span text:style-name="T2">(2/1) </text:span> ⲙ ⲡⲓⲛⲟⲉⲣ[ⲟⲛ <text:line-break/><text:span text:style-name="T1"> </text:span><text:span text:style-name="T2">(2/2) </text:span> ⲁⲩⲱ ⲁⲉⲓ̣[ <text:line-break/><text:span text:style-name="T1"> </text:span><text:span text:style-name="T2">(2/3) </text:span> ϩⲙ ⲡⲓⲛⲕ̣[...] ⲛ ⲕ[.]..[ <text:line-break/><text:span text:style-name="T1"> </text:span><text:span text:style-name="T2">(2/4) </text:span> ⲙ ⲡ̣ⲁⲛⲟⲩⲧ[ⲉ <text:line-break/><text:span text:style-name="T1"> </text:span><text:span text:style-name="T2">(2/5) </text:span> [...] ⲉⲁⲉⲓⲣ ϩ[....] ⲡ[...]ⲁ̣ⲛⲧ̣[...... <text:line-break/><text:span text:style-name="T1"> </text:span><text:span text:style-name="T2">(2/6) </text:span> ϭⲙϭⲟⲙ ϩⲛ [ⲟ]ⲩ̣ⲡ̅ⲛ̅ⲁ̅ ⲉϥ̣ⲟ̣ⲩⲁⲁ[ⲃ· ⲡⲏ] <text:line-break/><text:span text:style-name="T1"> </text:span><text:span text:style-name="T2">(2/7) </text:span> ⲉⲧ’ϫⲟⲥⲉ [ⲉ ⲛⲟ]ⲩⲧⲉ· ⲁⲩⲱ ⲁ[ϥ.... <text:line-break/><text:span text:style-name="T1"> </text:span><text:span text:style-name="T2">(2/8) </text:span> ϩⲓϫⲱⲉⲓ ⲙⲁⲩ̣ⲁⲁⲧ’ ⲉⲉⲓⲥⲟⲩⲧⲱ̣[ⲛ ⲁⲩⲱ] <text:line-break/><text:span text:style-name="T1"> </text:span><text:span text:style-name="T2">(2/9) </text:span> ⲁⲉⲓⲛⲁⲩ ⲉ ⲡⲓⲧⲉⲗⲓⲟⲥ ⲛ ⲁⲗⲟ[ⲩ...... <text:line-break/><text:span text:style-name="T1"> </text:span><text:span text:style-name="T2">(2/10) </text:span> ⲡⲉ ⲛⲧⲟϥ· ⲁⲩⲱ ⲙⲛ ⲡⲏ ⲉⲧ.[...ⲛ ⲟⲩ]‐ <text:line-break/><text:span text:style-name="T1"> </text:span><text:span text:style-name="T2">(2/11) </text:span> ⲙⲏⲏϣⲉ ⲛ ⲥⲟⲡ’ ⲙⲛ ⲟⲩⲁⲧⲟ ⲛ ⲣ[ⲏⲧⲉ ⲉⲩ]‐ <text:line-break/><text:span text:style-name="T1"> </text:span><text:span text:style-name="T2">(2/12) </text:span> ⲟⲩⲟⲛϩ ⲛⲁⲓ̈ ⲉⲃⲟⲗ· ⲙ ⲡⲉⲓ̈ⲣⲏⲧⲉ ⲟ̣[ⲩⲉⲓ]‐ <text:line-break/><text:span text:style-name="T1"> </text:span><text:span text:style-name="T2">(2/13) </text:span> ⲱⲧ’ ⲉϥⲟⲩⲱϣ· ⲉⲉⲓⲕⲱⲧⲉ ⲛⲥⲁ ⲡ[ⲓϩⲟ]‐ <text:line-break/><text:span text:style-name="T1"> </text:span><text:span text:style-name="T2">(2/14) </text:span> ⲟⲩⲧ’ ⲛ ⲉⲓⲱⲧ’ ⲛⲧⲉ ⲛⲁⲓ̈ ⲧⲏⲣⲟⲩ [ⲛⲏ ⲉⲧ’]‐ <text:line-break/><text:span text:style-name="T1"> </text:span><text:span text:style-name="T2">(2/15) </text:span> ϩⲛ ⲟⲩⲉⲛⲛⲟⲓⲁ ⲙⲛ ⲟⲩⲉⲥⲑⲏⲥⲓⲥ ϩ̣[ⲛ ⲟⲩ]‐ <text:line-break/><text:span text:style-name="T1"> </text:span><text:span text:style-name="T2">(2/16) </text:span> ⲉⲓⲇⲟⲥ ⲁⲩⲱ ⲟⲩⲅⲉⲛⲟⲥ ⲙⲛ ⲟⲩ[ⲙⲉ]‐ <text:line-break/><text:soft-page-break/><text:span text:style-name="T1"> </text:span><text:span text:style-name="T2">(2/17) </text:span> ⲣⲟⲥ ⲁⲩⲱ ⲟⲩⲡⲧⲏⲣϥ ⲙⲛ ⲡⲏ ⲉ[ⲧⲁ]‐ <text:line-break/><text:span text:style-name="T1"> </text:span><text:span text:style-name="T2">(2/18) </text:span> ⲙⲁϩⲧⲉ ⲁⲩⲱ ⲉⲧⲟⲩⲁⲙⲁϩⲧⲉ ⲙⲙ[ⲟϥ] <text:line-break/><text:span text:style-name="T1"> </text:span><text:span text:style-name="T2">(2/19) </text:span> ⲙⲛ ⲟⲩⲥⲱⲙⲁ ⲁⲩⲱ ⲟⲩⲁⲧⲥⲱ̣[ⲙⲁ] <text:line-break/><text:span text:style-name="T1"> </text:span><text:span text:style-name="T2">(2/20) </text:span> ⲙⲛ ⲟⲩⲟⲩⲥⲓⲁ ⲁⲩⲱ ⲟⲩϩⲩⲗⲏ ⲙ[ⲛ ⲛⲉⲧ]‐ <text:line-break/><text:span text:style-name="T1"> </text:span><text:span text:style-name="T2">(2/21) </text:span> ⲛⲧⲉⲩ ⲧⲏⲣⲟⲩ· ⲁⲩⲱ ϯϩⲩⲡⲁⲣⲝⲓⲥ̣ [ⲉⲥ] <text:line-break/><text:span text:style-name="T1"> </text:span><text:span text:style-name="T2">(2/22) </text:span> ⲙⲟϫⲕ ⲛⲙⲙⲁⲩ ⲙⲛ ⲡⲛⲟⲩⲧⲉ ⲛⲧⲉ <text:line-break/><text:span text:style-name="T1"> </text:span><text:span text:style-name="T2">(2/23) </text:span> {ⲡⲉⲓ̈}ⲡⲓⲕ̅ⲗ̅ⲥ̣̅̅ ⲛ̅ⲛ ⲁⲧⲙⲓⲥⲉ ⲙ̣ⲛ ϯϭⲟⲙ [ⲉⲧⲛ]‐ <text:line-break/><text:span text:style-name="T1"> </text:span><text:span text:style-name="T2">(2/24) </text:span> ⲧⲟⲟⲧⲟⲩ ⲧⲏⲣⲟⲩ· ⲁⲩⲱ ϯϩ̣ⲩⲡⲁⲣⲝⲓ[ⲥ] <text:line-break/><text:span text:style-name="T1"> </text:span><text:span text:style-name="T2">(2/25) </text:span> ϫⲉ ⲡⲱⲥ ⲛⲉⲧ’ϣⲟⲟⲡ’ ⲉϩⲉⲛⲉⲃⲟⲗ ϩⲙ <text:line-break/><text:span text:style-name="T1"> </text:span><text:span text:style-name="T2">(2/26) </text:span> ⲡⲉⲱⲛ ⲛⲧⲉ ⲛⲉⲧ’ϣⲟⲟⲡ ⲛⲉ ⲉⲃⲟⲗ <text:line-break/><text:span text:style-name="T1"> </text:span><text:span text:style-name="T2">(2/27) </text:span> ϩⲛ ⲟⲩⲡ̅ⲛ̅ⲁ̅ ⲛ̅ⲛ ⲁⲧⲛⲁⲩ ⲉⲣⲟϥ ⲁⲩⲱ ⲛⲛ ⲁ[ⲧ’]‐ <text:line-break/><text:span text:style-name="T1"> </text:span><text:span text:style-name="T2">(2/28) </text:span> ⲡⲱϣⲉ ⲛⲛ ⲁⲩⲧⲟⲅⲉⲛⲏⲥ ⲉϩⲉⲛⲅ̅ ⲛ [ⲉⲓ]‐ <text:line-break/><text:span text:style-name="T1"> </text:span><text:span text:style-name="T2">(2/29) </text:span> ⲛⲉ ⲛⲛ ⲁⲧ’ⲙ[ⲓ]ⲥ̣ⲉ ⲉⲩⲛⲧⲁⲩ ⲙⲙⲁⲩ <text:line-break/><text:span text:style-name="T1"> </text:span><text:span text:style-name="T2">(2/30) </text:span> ⲛⲛ ⲟⲩⲁⲣⲭⲏ ⲉⲥⲥⲟⲧⲡ’ ⲉ ⲧ’ϩⲩⲡⲁⲣⲝ[ⲓⲥ] <text:line-break/><text:span text:style-name="T1"> </text:span><text:span text:style-name="T2">(2/31) </text:span> ⲁⲩⲱ ⲉⲩⲣ ϣⲟⲣⲡ’ ⲛ ϣⲟⲟⲡ̣ [ⲉ ⲛⲁⲓ̈ ⲧⲏ]‐ <text:line-break/><text:span text:style-name="T1"> </text:span><text:span text:style-name="T2">(2/32) </text:span> ⲣⲟⲩ· ⲉⲁⲩϣⲱⲡⲉ ⲇⲉ ⲙ ⲡⲓⲕ̣[ⲟⲥⲙⲟⲥ] <text:line-break/><text:span text:style-name="T1"> </text:span><text:span text:style-name="T2">(2/33) </text:span> ⲏ%0 ⲡⲱⲥ ⲛⲏ ⲉⲧⲟⲩⲃⲏϥ ⲙⲛ ⲛⲁⲓ̈ ⲧⲏ[ⲣⲟⲩ] <text:line-break/><text:span text:style-name="T1"> </text:span><text:span text:style-name="T2">(3/1) </text:span> [............ⲛⲁ]ⲛ̣ⲟⲩϥ· ⲡⲁⲓ̈ <text:line-break/><text:span text:style-name="T1"> </text:span><text:span text:style-name="T2">(3/2) </text:span> [.........]ⲁ[......] ⲁ̣ⲩⲱ ⲛⲗⲟⲉⲓ‐ <text:line-break/><text:span text:style-name="T1"> </text:span><text:span text:style-name="T2">(3/3) </text:span> [ϭⲉ ⲁ]ⲩ̣ⲱ ϫⲉ ⲁϣ̣ [ⲡⲉ ⲡⲧ]ⲟⲡⲟⲥ ⲛ[ⲧ]ⲉ <text:line-break/><text:span text:style-name="T1"> </text:span><text:span text:style-name="T2">(3/4) </text:span> [ⲡⲏ ⲉ]ⲧ̣ⲙⲙⲁⲩ· ⲏ%0 ⲟⲩ ⲛ ⲁⲣⲭⲏ ⲉⲧⲛⲧⲁϥ <text:line-break/><text:span text:style-name="T1"> </text:span><text:span text:style-name="T2">(3/5) </text:span> [ⲙⲙⲁ]ⲩ· ⲏ ⲛ ⲁϣ ⲛ ⲣⲏⲧⲉ ⲡⲓⲉⲃⲟⲗ ⲙⲙⲟϥ <text:line-break/><text:span text:style-name="T1"> </text:span><text:span text:style-name="T2">(3/6) </text:span> [ⲉϥ]ϣⲟⲟⲡ’ ⲛⲁϥ ⲙⲛ [ⲛⲁⲓ̈] ⲧⲏⲣⲟⲩ· ⲏ%0 ⲡⲱⲥ‐ <text:line-break/><text:span text:style-name="T1"> </text:span><text:span text:style-name="T2">(3/7) </text:span> [ⲉϥϣⲱ]ⲡⲉ ⲛ ϩⲁⲡⲗⲟⲩⲛ ⲉϥϣⲉⲃⲓⲏⲟⲩⲧ’ <text:line-break/><text:span text:style-name="T1"> </text:span><text:span text:style-name="T2">(3/8) </text:span> [ⲉⲣⲟϥ] ⲙ̣ⲁⲩⲁⲁϥ· ⲉϥϣⲟⲟⲡ’ ⲛ ⲟⲩϩⲩ‐ <text:line-break/><text:span text:style-name="T1"> </text:span><text:span text:style-name="T2">(3/9) </text:span> [ⲡⲁ]ⲣ̣ⲝ̣ⲓⲥ ⲙⲛ ⲟⲩⲉⲓⲇⲟⲥ· ⲁⲩⲱ ⲟⲩⲙⲛⲧ’‐ <text:line-break/><text:span text:style-name="T1"> </text:span><text:span text:style-name="T2">(3/10) </text:span> [ⲙ]ⲁ̣ⲕⲁⲣⲓⲟⲥ· ⲁⲩⲱ ⲉϥϯ ⲛ ⲟⲩϭⲟⲙ ⲉϥ‐ <text:line-break/><text:span text:style-name="T1"> </text:span><text:span text:style-name="T2">(3/11) </text:span> [ⲟ]ⲛϩ ϩⲙ ⲡⲱⲛϩ· ⲏ%0 ⲛ ⲁϣ ⲛ ⲣⲏⲧⲉ ϯϩⲩ‐ <text:line-break/><text:span text:style-name="T1"> </text:span><text:span text:style-name="T2">(3/12) </text:span> [ⲡ]ⲁⲣⲝⲓⲥ ⲉⲧⲉ ⲛⲥϣⲟⲟⲡ’ ⲁⲛ ⲁⲥⲟⲩ‐ <text:line-break/><text:span text:style-name="T1"> </text:span><text:span text:style-name="T2">(3/13) </text:span> ⲱⲛϩ ⲉⲃⲟⲗ ϩⲛ ⲟⲩϭⲟⲙ ⲉⲥϣⲟⲟⲡ’· <text:line-break/><text:span text:style-name="T1"> </text:span><text:span text:style-name="T2">(3/14) </text:span> [ⲛ]ⲁ̣ⲓ̈ ⲇⲉ ⲉⲉⲓϣⲟϫⲛⲉ ⲉ ⲉⲓⲙⲉ ⲉⲣⲟ[ⲟ]ⲩ· <text:line-break/><text:span text:style-name="T1"> </text:span><text:span text:style-name="T2">(3/15) </text:span> [ⲁ]ⲩⲱ ⲛⲉⲓ̈ⲉ[ⲓ]ⲛⲉ ⲉϩⲣⲁⲓ̈ ⲙ ⲙⲏⲛⲉ ⲕⲁⲧⲁ <text:line-break/><text:span text:style-name="T1"> </text:span><text:span text:style-name="T2">(3/16) </text:span> ⲡ̣ⲧⲱⲡ’ ⲛⲧⲉ ⲡⲁⲅⲉⲛⲟⲥ ⲙ ⲡⲛⲟⲩⲧⲉ <text:line-break/><text:span text:style-name="T1"> </text:span><text:span text:style-name="T2">(3/17) </text:span> [ⲛ]ⲧ̣ⲉ ⲛⲁⲉⲓⲟⲧⲉ· ⲛⲉⲓ̈ϫⲱ ⲙ ⲡⲥⲙⲟⲩ ⲛ‐ <text:line-break/><text:span text:style-name="T1"> </text:span><text:span text:style-name="T2">(3/18) </text:span> [ⲧ]ⲉ ⲛⲁⲓ̈ ⲧⲏⲣⲟⲩ· ⲛⲁϣⲟⲣⲡ’ ⲛ ⲉⲓⲟⲧⲉ <text:line-break/><text:span text:style-name="T1"> </text:span><text:span text:style-name="T2">(3/19) </text:span> [ⲅ]ⲁⲣ ⲙⲛ ⲛⲁⲉⲓⲟⲧⲉ ⲉⲧⲁⲩⲕⲱⲧⲉ ⲁⲩϭⲓⲛⲉ <text:line-break/><text:span text:style-name="T1"> </text:span><text:span text:style-name="T2">(3/20) </text:span> ⲁⲛⲟⲕ ⲇⲉ ⲙⲡⲓⲕⲁ ⲧⲟⲟⲧ’ ⲉⲃⲟⲗ ⲉⲉⲓⲣ ⲁⲓⲧⲓ <text:line-break/><text:span text:style-name="T1"> </text:span><text:span text:style-name="T2">(3/21) </text:span> ⲛⲥⲁ ⲟ[ⲩ]ⲙⲁ ⲛ ⲙⲧⲟⲛ ⲉϥⲙⲡϣⲁ ⲙ ⲡⲁⲡ̅ⲛ̅ⲁ̅· <text:line-break/><text:span text:style-name="T1"> </text:span><text:span text:style-name="T2">(3/22) </text:span> ⲉⲙⲡ[ⲁ]ⲧ̣ⲟⲩⲥⲟⲛϩⲧ’ ϩⲙ ⲡⲓⲉⲥⲑⲏⲧⲟⲛ <text:line-break/><text:span text:style-name="T1"> </text:span><text:span text:style-name="T2">(3/23) </text:span> ⲛ ⲕⲟⲥⲙⲟⲥ· ⲁⲩⲱ ⲧⲟⲧⲉ ⲉⲓ̈ⲙⲟⲕϩ ⲛ ϩⲏⲧ’ <text:line-break/><text:span text:style-name="T1"> </text:span><text:span text:style-name="T2">(3/24) </text:span> ⲉⲙⲁⲧⲉ ⲁⲩⲱ ⲉⲉⲓⲟ̣ⲕⲙ ⲉⲧⲃⲉ ϯⲙⲛⲧ’‐ <text:line-break/><text:span text:style-name="T1"> </text:span><text:span text:style-name="T2">(3/25) </text:span> ⲕⲟⲩⲉ[ⲓ] ⲛ ϩⲏⲧ’ ⲉⲧ’ⲕⲱⲧⲉ ⲉⲣ̣ⲟ̣ⲉⲓ· ⲁⲉⲓⲣ <text:line-break/><text:span text:style-name="T1"> </text:span><text:span text:style-name="T2">(3/26) </text:span> ⲧⲟⲗⲙⲁ ⲉ ⲉⲓⲣⲉ ⲛ ⲟⲩ[ⲗ]ⲁⲁⲩ ⲁⲩⲱ ⲉ ⲧⲁ‐ <text:line-break/><text:span text:style-name="T1"> </text:span><text:span text:style-name="T2">(3/27) </text:span> ⲁⲧ’ ⲛ ⲛⲓⲑⲏⲣⲓⲟⲛ ⲛ̣[ⲧ]ⲉ ⲧ̣ⲉⲣⲏⲙⲟⲥ· <text:line-break/><text:span text:style-name="T1"> </text:span><text:span text:style-name="T2">(3/28) </text:span> ⲉϩⲣⲁⲓ̈ ⲉⲩⲧⲁⲕⲟ ⲉϥⲛⲁϣⲧ’· ⲁϥⲁϩⲉⲣⲁⲧϥ <text:line-break/><text:span text:style-name="T1"> </text:span><text:span text:style-name="T2">(3/29) </text:span> ⲛⲁⲓ̈ [ⲛ]ϭⲓ ⲡⲁⲅⲅⲉⲗⲟⲥ ⲛⲧⲉ ϯⲅⲛⲱⲥⲓⲥ ⲛⲧⲉ <text:line-break/><text:span text:style-name="T1"> </text:span><text:span text:style-name="T2">(3/30) </text:span> [ⲡⲓⲟⲩⲟ]ⲉ̣ⲓⲛ ϣⲁ ⲉⲛⲉϩ· ⲁⲩⲱ ⲡⲉϫⲁϥ ⲛⲁⲓ̈ <text:line-break/><text:soft-page-break/><text:span text:style-name="T1"> </text:span><text:span text:style-name="T2">(3/31) </text:span> [ϫⲉ] ⲍ̅ⲱ̅ⲥ̅ⲧ̅ⲣ̅ⲓ̅ⲁ̅ⲛ̅ⲉ̅· ⲉⲧⲃⲉ ⲟⲩ ⲁⲕⲗⲓⲃⲉ ⲙ <text:line-break/><text:span text:style-name="T1"> </text:span><text:span text:style-name="T2">(3/32) </text:span> [ⲡⲓ]ⲣⲏⲧⲉ· ⲉⲕⲉ ⲛⲛ ⲁⲧⲙⲙⲉ ⲉ ⲛⲓⲛⲁϭ ⲛ ϣⲁ ⲉⲛⲉϩ <text:line-break/><text:span text:style-name="T1"> </text:span><text:span text:style-name="T2">(4/1) </text:span> ⲉⲧ’ⲥⲁϩⲣⲁ[ⲓ̈ <text:line-break/><text:span text:style-name="T1"> </text:span><text:span text:style-name="T2">(4/2) </text:span> ⲉⲣⲟⲕ ⲁⲛ[ <text:line-break/><text:span text:style-name="T1"> </text:span><text:span text:style-name="T2">(4/3) </text:span> ⲁⲩⲱ ⲉⲧⲃ[ⲉ ....]ⲧ̣ⲁⲩⲟⲕⲉⲡ[..... <text:line-break/><text:span text:style-name="T1"> </text:span><text:span text:style-name="T2">(4/4) </text:span> ⲁ[.] ϫⲉ ⲉⲕⲉⲛ[ⲟ]ⲩ[ϩ]ⲙ̣ ⲧⲉⲛⲟⲩ· ⲙ[.... <text:line-break/><text:span text:style-name="T1"> </text:span><text:span text:style-name="T2">(4/5) </text:span> ⲡⲉ ⲣⲱ ϩⲛ ⲧⲁⲕⲟ ⲉⲛⲉϩ· ⲟⲩⲇⲉ [..... <text:line-break/><text:span text:style-name="T1"> </text:span><text:span text:style-name="T2">(4/6) </text:span> ⲙⲉ ⲉ ⲛⲏ ⲉⲧⲕⲥⲟⲟⲩⲛ ⲙⲙⲟⲟⲩ̣ [ϩⲓⲛⲁ] <text:line-break/><text:span text:style-name="T1"> </text:span><text:span text:style-name="T2">(4/7) </text:span> ϫⲉ ⲉⲕⲉⲛⲟⲩ[ϩ]ⲙ̣ ⲛ ϩⲉⲛⲕⲟⲟⲩⲉ· ⲛ̣[ⲏ ⲉⲧⲉ]‐ <text:line-break/><text:span text:style-name="T1"> </text:span><text:span text:style-name="T2">(4/8) </text:span> ⲡⲓⲱⲧ’ ⲛⲧ[ⲉ] ⲛⲓϫⲓⲥⲉ ⲛⲁⲥⲟⲧⲡⲟ̣[ⲩ ⲕⲙⲉ]‐ <text:line-break/><text:span text:style-name="T1"> </text:span><text:span text:style-name="T2">(4/9) </text:span> ⲉⲩⲉ ⲟⲛ ϫⲉ ⲛⲧⲕ ⲡⲓⲱⲧ’ ⲛⲧⲉ ⲡ[ⲉⲕⲅⲉⲛⲟⲥ] <text:line-break/><text:span text:style-name="T1"> </text:span><text:span text:style-name="T2">(4/10) </text:span> ⲏ%0 ϫⲉ ⲓ̅̈̅ⲟ̅ⲗ̅ⲁ̅ⲟ̅ⲥ̅ ⲡⲉ ⲡⲉⲕⲉⲓⲱⲧ’· ⲟ̣ⲩ[... <text:line-break/><text:span text:style-name="T1"> </text:span><text:span text:style-name="T2">(4/11) </text:span> ⲟⲩⲁⲅⲅⲉⲗⲟⲥ ⲛⲧⲉ ⲡⲛⲟⲩⲧⲉ ⲉⲁ[... <text:line-break/><text:span text:style-name="T1"> </text:span><text:span text:style-name="T2">(4/12) </text:span> ⲉⲧ’ ⲛⲁⲕ ⲉⲃⲟⲗ ϩⲓⲧⲛ ϩⲉⲛⲣⲱⲙⲉ ⲉ[ⲩⲟⲩ]‐ <text:line-break/><text:span text:style-name="T1"> </text:span><text:span text:style-name="T2">(4/13) </text:span> ⲁⲁⲃ· ⲁⲙⲟⲩ ⲛⲅⲥⲓⲛⲉ ⲉⲃⲟⲗ ϩⲛ ⲛ[ⲁⲓ̈] <text:line-break/><text:span text:style-name="T1"> </text:span><text:span text:style-name="T2">(4/14) </text:span> ⲛⲁⲓ̈ ⲉⲧⲕⲛⲁⲕⲟⲧⲕ ⲉⲣⲟⲟⲩ ⲟⲛ ⲛ ⲕⲉ̣[ⲥⲟⲡ] <text:line-break/><text:span text:style-name="T1"> </text:span><text:span text:style-name="T2">(4/15) </text:span> ϩⲓⲛⲁ ϫⲉ ⲉⲕⲁⲧⲁϣⲉ ⲟⲉⲓϣ ⲛ ⲟⲩⲅⲉⲛ̣[ⲉⲁ] <text:line-break/><text:span text:style-name="T1"> </text:span><text:span text:style-name="T2">(4/16) </text:span> ⲉⲥⲟⲛϩ· ⲁⲩⲱ ⲛⲅⲛⲟⲩϩⲙ ⲛ ⲛⲏ ⲉⲧ[ⲙ]‐ <text:line-break/><text:span text:style-name="T1"> </text:span><text:span text:style-name="T2">(4/17) </text:span> ⲡϣⲁ· ⲁⲩⲱ ⲛⲅϯ ϭⲟⲙ ⲛ ⲛⲓⲥⲱⲧ[ⲡ] <text:line-break/><text:span text:style-name="T1"> </text:span><text:span text:style-name="T2">(4/18) </text:span> ϫⲉ ⲟⲩⲛⲟϭ ⲡⲉ ⲡⲓⲁⲅⲱⲛ ⲛⲧⲉ ⲡⲓⲉ̣[ⲱⲛ] <text:line-break/><text:span text:style-name="T1"> </text:span><text:span text:style-name="T2">(4/19) </text:span> ⲁⲩⲱ ϫⲉ ⲟⲩⲕⲟⲩⲉⲓ ⲡⲉ ⲡⲓⲭⲣⲟⲛⲟ[ⲥ ⲙ] <text:line-break/><text:span text:style-name="T1"> </text:span><text:span text:style-name="T2">(4/20) </text:span> ⲡⲉⲓ̈ⲙⲁ· ⲛⲁⲓ̈ ⲇⲉ ⲛⲧⲉⲣⲉϥϫⲟⲟⲩ ⲛ[ⲁⲓ̈] <text:line-break/><text:span text:style-name="T1"> </text:span><text:span text:style-name="T2">(4/21) </text:span> ⲁⲛⲟⲕ ϩⲛ ⲟⲩⲛⲟϭ ⲛ ⲓ̈ⲏⲥ ⲙⲛ ⲟⲩⲛⲟ[ϭ ⲛ] <text:line-break/><text:span text:style-name="T1"> </text:span><text:span text:style-name="T2">(4/22) </text:span> ⲟⲩⲣⲟⲧ’ ⲛ ϩⲏ[ⲧ’] ⲁⲉⲓⲁⲗⲉ ⲛⲙⲙⲁϥ ⲉϩⲣ[ⲁⲓ̈] <text:line-break/><text:span text:style-name="T1"> </text:span><text:span text:style-name="T2">(4/23) </text:span> ⲉⲩⲛⲟϭ ⲛ ⲕⲗⲟⲟⲗⲉ ⲛ ⲟⲩⲟⲉ̣[ⲓ]ⲛ̣ ⲁⲉⲓⲕ̣[ⲱ] <text:line-break/><text:span text:style-name="T1"> </text:span><text:span text:style-name="T2">(4/24) </text:span> ⲙ ⲡⲁⲡⲗⲁⲥⲙⲁ ϩⲓϫⲙ ⲡⲕⲁ[ϩ] ⲉⲩⲁⲣⲉ̣[ϩ] <text:line-break/><text:span text:style-name="T1"> </text:span><text:span text:style-name="T2">(4/25) </text:span> ⲉⲣⲟϥ ⲉⲃⲟⲗ ϩⲓⲧⲛ ϩⲉⲛⲉⲟⲟⲩ· ⲁⲩⲱ ⲁ[ⲓ̈]‐ <text:line-break/><text:span text:style-name="T1"> </text:span><text:span text:style-name="T2">(4/26) </text:span> ⲛⲟⲩϩⲙ ⲉⲃⲟⲗ [ϩ]ⲙ ⲡⲓⲕⲟⲥⲙⲟⲥ ⲧⲏⲣϥ̣ <text:line-break/><text:span text:style-name="T1"> </text:span><text:span text:style-name="T2">(4/27) </text:span> ⲙⲛ ⲡⲓ̣ⲓ̣̅ ⲅ̅ ⲛ̅[ⲛ] ⲉⲱⲛ ⲉⲧ’ϣⲟⲟⲡ’ <text:line-break/><text:span text:style-name="T1"> </text:span><text:span text:style-name="T2">(4/28) </text:span> ⲛϩⲏⲧϥ [ⲙⲛ ⲛⲟ]ⲩⲙⲛⲧ’ⲁⲅⲅⲉⲗⲟⲥ <text:line-break/><text:span text:style-name="T1"> </text:span><text:span text:style-name="T2">(4/29) </text:span> ⲙⲡⲟⲩⲛⲁⲩ ⲉⲣⲟⲛ[·] ⲁⲩⲱ ⲡⲟⲩⲁⲣ‐ <text:line-break/><text:span text:style-name="T1"> </text:span><text:span text:style-name="T2">(4/30) </text:span> ⲭⲱⲛ ⲁϥϣⲧⲟⲣⲧⲣ ϩⲁⲑⲏ ⲛ ⲧ̣[ⲉⲛϩⲓⲏ ⲙ] <text:line-break/><text:span text:style-name="T1"> </text:span><text:span text:style-name="T2">(4/31) </text:span> ⲙⲟⲟϣⲉ· ϯϭⲏⲡⲉ ⲅⲁⲣ ⲛ ⲟⲩ̣[ⲟⲉⲓⲛ] <text:line-break/><text:span text:style-name="T1"> </text:span><text:span text:style-name="T2">(5/1) </text:span> [.]ⲧⲛ[.......].[....] ⲉⲥⲥⲟⲧⲡ’ <text:line-break/><text:span text:style-name="T1"> </text:span><text:span text:style-name="T2">(5/2) </text:span> ⲛϩⲟ̣[ⲩⲟ ⲉ ⲕⲟ]ⲥ̣ⲙⲓⲕ[ⲟⲛ ⲛⲓ]ⲙ· ⲉⲩ̣ⲁⲧ’‐ <text:line-break/><text:span text:style-name="T1"> </text:span><text:span text:style-name="T2">(5/3) </text:span> ϣ̣ⲁϫ̣ⲉ ⲙⲙⲟϥ ⲡⲉ̣ ⲡ[ⲉ]ⲥ̣ⲥⲁ ⲉⲥϯ ⲟⲩⲟ‐ <text:line-break/><text:span text:style-name="T1"> </text:span><text:span text:style-name="T2">(5/4) </text:span> [ⲉ]ⲓ̣[ⲛ] ⲉ̣ⲩⲛⲧⲁⲥ ⲛ ⲟⲩϭⲟⲙ ⲉⲥϫⲓ ⲙⲟ‐ <text:line-break/><text:span text:style-name="T1"> </text:span><text:span text:style-name="T2">(5/5) </text:span> [ⲉⲓⲧ ϩ]ⲏⲧⲟⲩ ⲛ ϩⲉⲛⲡⲛ̅ⲁ̅ ⲉⲩⲟⲩⲁⲁⲃ <text:line-break/><text:span text:style-name="T1"> </text:span><text:span text:style-name="T2">(5/6) </text:span> [ⲉⲥϣ]ⲟⲟⲡ’ ⲛ ⲟⲩⲡ̣ⲛ̣̅[ⲁ̅] ⲛ̅ ⲣⲉϥⲧⲁⲛϩⲟ· <text:line-break/><text:span text:style-name="T1"> </text:span><text:span text:style-name="T2">(5/7) </text:span> [ⲙⲛ] ⲟ̣ⲩϣⲁϫⲉ ⲛ ⲛⲟⲉ̣ⲣⲟⲛ· ⲙ̅ ⲡⲣⲏⲧⲉ <text:line-break/><text:span text:style-name="T1"> </text:span><text:span text:style-name="T2">(5/8) </text:span> [ⲁⲛ ⲛ] ⲛⲏ ⲉⲧ’ϣⲟⲟⲡ’ ϩⲙ ⲡⲓⲕⲟⲥⲙⲟⲥ <text:line-break/><text:span text:style-name="T1"> </text:span><text:span text:style-name="T2">(5/9) </text:span> [..].ⲓ ⲛ̅ⲧⲉ ⲟⲩϩⲩⲗⲏ ⲉϣⲁⲥϣⲓⲃⲉ <text:line-break/><text:span text:style-name="T1"> </text:span><text:span text:style-name="T2">(5/10) </text:span> [ⲙ]ⲛ̣ ⲟⲩϣⲁϫⲉ ⲉϣⲁϥⲧⲱϭⲛ· ⲁⲩⲱ <text:line-break/><text:span text:style-name="T1"> </text:span><text:span text:style-name="T2">(5/11) </text:span> [ⲧ]ⲟ̣ⲧⲉ ⲁⲉⲓⲥⲟⲩⲱⲛ ϯϭⲟⲙ ⲉⲧ’ϣⲟ‐ <text:line-break/><text:span text:style-name="T1"> </text:span><text:span text:style-name="T2">(5/12) </text:span> [ⲟ]ⲡ’ ⲛϩⲏⲧ’ ϫⲉ ⲛⲉⲥⲕⲏ ϩⲓϫⲛ ⲡⲓⲕⲁⲕⲉ <text:line-break/><text:span text:style-name="T1"> </text:span><text:span text:style-name="T2">(5/13) </text:span> [ⲉ]ⲩⲛⲧⲁⲥ ⲙⲙⲁⲩ ⲙ ⲡⲓⲟⲩⲟⲉⲓⲛ̣ ⲧⲏⲣϥ· <text:line-break/><text:span text:style-name="T1"> </text:span><text:span text:style-name="T2">(5/14) </text:span> [ⲁ]ⲉⲓϫⲓ ⲱⲙⲥ̣ ⲙ ⲡⲓⲙⲁ ⲉⲧⲙⲙⲁⲩ· ⲁⲩⲱ <text:line-break/><text:soft-page-break/><text:span text:style-name="T1"> </text:span><text:span text:style-name="T2">(5/15) </text:span> [ⲁ]ⲉⲓϫⲓ ⲡⲓⲛⲉ ⲛ ⲛⲓⲉⲟⲟⲩ ⲉⲧ’ϩⲙ ⲡⲙⲁ <text:line-break/><text:span text:style-name="T1"> </text:span><text:span text:style-name="T2">(5/16) </text:span> [ⲉ]ⲧⲙⲙⲁⲩ· ⲁⲉⲓϣⲱⲡⲉ ⲙ ⲡⲣⲏⲧⲉ ⲛ <text:line-break/><text:span text:style-name="T1"> </text:span><text:span text:style-name="T2">(5/17) </text:span> [ⲟ]ⲩⲁ ⲙⲙⲟⲟⲩ· ⲁⲉⲓⲥⲓⲛⲉ ⲉⲃⲟⲗ ϩⲙ ⲡⲓ‐ <text:line-break/><text:span text:style-name="T1"> </text:span><text:span text:style-name="T2">(5/18) </text:span> [ⲕⲁϩ] ⲛ ⲁⲏⲣ· ⲁⲩⲱ ⲁⲉⲓⲥⲓⲛⲉ ⲛ ⲛⲓⲁⲛ‐ <text:line-break/><text:span text:style-name="T1"> </text:span><text:span text:style-name="T2">(5/19) </text:span> [ⲧⲓⲧⲩ]ⲡⲟⲥ ⲛⲛ ⲉⲱⲛ· ⲉⲁⲉⲓⲱⲙⲥ <text:line-break/><text:span text:style-name="T1"> </text:span><text:span text:style-name="T2">(5/20) </text:span> [ⲙ ⲡⲓⲙⲁ] ⲉⲧⲙⲙⲁⲩ ⲛ ⲥⲁϣϥ ⲛ ⲥⲟⲡ <text:line-break/><text:span text:style-name="T1"> </text:span><text:span text:style-name="T2">(5/21) </text:span> [ⲛ ⲟⲩⲙⲟⲟ]ⲩ ⲉϥⲟⲛϩ ⲕⲁⲧⲁ ⲡⲟⲩⲁ ⲡⲟⲩⲁ <text:line-break/><text:span text:style-name="T1"> </text:span><text:span text:style-name="T2">(5/22) </text:span> [ⲛⲧⲉ ⲛⲓ]ⲉⲱⲛ· ⲉⲙⲡⲓⲕ[ⲁ ⲧ]ⲟⲟⲧ’ ϣⲁⲛ‐ <text:line-break/><text:span text:style-name="T1"> </text:span><text:span text:style-name="T2">(5/23) </text:span> [ϯⲛⲁⲩ] ⲉ ⲙⲙⲟⲟⲩ [ⲧ]ⲏⲣ̣[ⲟⲩ ⲛ] ⲟⲩⲥⲟⲡ’ <text:line-break/><text:span text:style-name="T1"> </text:span><text:span text:style-name="T2">(5/24) </text:span> [ⲁⲩⲱ] ⲁⲓ̈ⲉⲓ ⲉϩⲣⲁⲓ̈ ⲉ [ϯⲟⲛⲧⲱ]ⲥ ⲉⲧ’ϣⲟ‐ <text:line-break/><text:span text:style-name="T1"> </text:span><text:span text:style-name="T2">(5/25) </text:span> [ⲟⲡ’] ⲙ̣ ⲡⲁⲣⲟⲓⲕⲏⲥ̣ⲓⲥ ⲁ[ⲓ̈]ϫⲓ ⲱⲙⲥ̣ ⲁⲩⲱ <text:line-break/><text:span text:style-name="T1"> </text:span><text:span text:style-name="T2">(5/26) </text:span> [....].[ⲕⲟ]ⲥ̣ⲙⲟⲥ· ⲁⲓ̈ⲉⲓ ⲉϩⲣⲁⲓ̈ ⲉ ϯⲟⲛ‐ <text:line-break/><text:span text:style-name="T1"> </text:span><text:span text:style-name="T2">(5/27) </text:span> [ⲧⲱⲥ ⲉ]ⲧ’̣ϣⲟⲟⲡ’ ⲙ ⲙⲉⲧⲁⲛⲟⲓⲁ <text:line-break/><text:span text:style-name="T1"> </text:span><text:span text:style-name="T2">(5/28) </text:span> [ⲁⲩⲱ ⲁⲉⲓ]ϫⲓ ⲱⲙⲥ ⲙ ⲡⲙⲁ ⲉⲧⲙⲙⲁⲩ <text:line-break/><text:span text:style-name="T1"> </text:span><text:span text:style-name="T2">(5/29) </text:span> [ⲛ ϥⲧ]ⲟⲟⲩ ⲛ ⲥⲟⲡ’· ⲁⲉⲓⲥⲓⲛⲉ ⲙ ⲡⲓ‐ <text:line-break/><text:span text:style-name="T1"> </text:span><text:span text:style-name="T2">(6/1) </text:span> ⲙⲉϩⲥⲟⲟⲩ̣ [ⲛ ⲉⲱⲛ] ϫ̣[........]...[.. <text:line-break/><text:span text:style-name="T1"> </text:span><text:span text:style-name="T2">(6/2) </text:span> ⲁⲩⲱ ⲁⲓ̈ⲉⲓ [ⲉϩⲣⲁⲓ̈] ⲉ ⲛⲓⲉ.[......]...[. <text:line-break/><text:span text:style-name="T1"> </text:span><text:span text:style-name="T2">(6/3) </text:span> ⲁⲓ̈ⲁϩⲉⲣⲁⲧ’ ⲙ[ⲙⲁ]ⲩ ⲉⲁⲉⲓⲛⲁⲩ ⲉⲩⲟⲩ̣ⲟⲉ̣[ⲓⲛ ⲛ]‐ <text:line-break/><text:span text:style-name="T1"> </text:span><text:span text:style-name="T2">(6/4) </text:span> ⲧⲉ ⲧⲙⲉ· ⲉϥϣⲟⲟⲡ’ ⲟⲛⲧⲱⲥ ⲉⲃ[ⲟ]ⲗ̣ ϩⲛ̣ [ⲟⲩ]‐ <text:line-break/><text:span text:style-name="T1"> </text:span><text:span text:style-name="T2">(6/5) </text:span> ⲛⲟⲩⲛⲉ ⲛⲧⲁϥ ⲛ ⲁⲩⲧⲟⲅⲉⲛⲏⲥ ⲙ[ⲛ ϩⲉⲛ]‐ <text:line-break/><text:span text:style-name="T1"> </text:span><text:span text:style-name="T2">(6/6) </text:span> ⲛⲟϭ ⲛ ⲁⲅⲅⲉⲗⲟⲥ ⲙⲛ ϩⲉⲛⲉⲟⲟ[ⲩ.... <text:line-break/><text:span text:style-name="T1"> </text:span><text:span text:style-name="T2">(6/7) </text:span> ⲉ ⲡϣⲓ· ⲁⲩ[ⲱ ⲁ]ⲉⲓϫⲓ ⲱⲙⲥ ⲉ ⲡ[ⲣⲁⲛ ⲙ] <text:line-break/><text:span text:style-name="T1"> </text:span><text:span text:style-name="T2">(6/8) </text:span> ⲡⲓⲁⲩⲧⲟⲅⲉ̣ⲛⲏⲥ ⲛ ⲛⲟⲩⲧⲉ ⲉ[ⲃⲟⲗ ϩⲓⲧⲟ]‐ <text:line-break/><text:span text:style-name="T1"> </text:span><text:span text:style-name="T2">(6/9) </text:span> ⲟⲧⲟⲩ ⲛ ⲛⲓϭⲟⲙ ⲛⲏ ⲉⲧ’ϣⲟⲟⲡ’̣ [ϩⲓϫⲛ ϩⲉⲛ]‐ <text:line-break/><text:span text:style-name="T1"> </text:span><text:span text:style-name="T2">(6/10) </text:span> ⲙⲟⲟⲩ ⲉⲩⲟⲛϩ ⲙⲓ̅ⲭ̅ⲁ̅ⲣ̅ ⲙⲛ ⲙⲓ̣̅[ⲭⲉⲁ̅] <text:line-break/><text:span text:style-name="T1"> </text:span><text:span text:style-name="T2">(6/11) </text:span> ⲁⲩⲱ ⲁⲉⲓⲧⲃⲃⲟ ⲉⲃⲟⲗ ϩⲓⲧⲟⲟⲧϥ ⲙ̣[ⲡⲓ]‐ <text:line-break/><text:span text:style-name="T1"> </text:span><text:span text:style-name="T2">(6/12) </text:span> ⲛⲟϭ ⲃ̅ⲁ̅ⲣ̅ⲫ̅ⲁ̅ⲣ̅ⲁ̅ⲅ̅ⲅ̅ⲏ̅ⲥ̅· ⲁⲩⲱ ⲁⲩ[ⲟⲩⲟⲛϩ]‐ <text:line-break/><text:span text:style-name="T1"> </text:span><text:span text:style-name="T2">(6/13) </text:span> ⲟⲩ ⲛⲁⲓ̈ ⲁⲩⲥⲁϩⲧ’ ϩⲙ ⲡⲓⲉⲟⲟⲩ· [ⲁⲩⲣ]‐ <text:line-break/><text:span text:style-name="T1"> </text:span><text:span text:style-name="T2">(6/14) </text:span> ⲥⲫⲣⲁⲅⲓⲍⲉ ⲙⲙⲟⲉⲓ ⲉⲃⲟⲗ ϩⲓⲧⲟⲟⲧ[ⲟⲩ] <text:line-break/><text:span text:style-name="T1"> </text:span><text:span text:style-name="T2">(6/15) </text:span> ⲛ ⲛⲏ ⲉⲧ’ϣⲟⲟⲡ’ ϩⲓϫⲛ ⲛⲉⲓ̈ϭⲟⲙ [ⲙ̅ⲓ̅ⲭ̅ⲁ̅ⲣ̅ 〈ⲙⲛ〉] <text:line-break/><text:span text:style-name="T1"> </text:span><text:span text:style-name="T2">(6/16) </text:span> ⲙⲓ̣̅̅[̅ⲭ̅]̅ⲉ̅ⲩ̅ⲥ̅· ⲙⲛ ⲥ̅ⲉⲗϫⲁⲱ̅ ⲙⲛ ⲉ̅ⲗⲉ̣̅[ⲛⲟⲥ] <text:line-break/><text:span text:style-name="T1"> </text:span><text:span text:style-name="T2">(6/17) </text:span> ⲙⲛ ⲍ̅ⲱ̅ⲅ̅ⲉ̅ⲛ̅ⲉ̅ⲑ̅ⲗ̅ⲟ̅ⲥ̅· ⲁⲩⲱ ⲁⲉⲓϣ[ⲱⲡⲉ] <text:line-break/><text:span text:style-name="T1"> </text:span><text:span text:style-name="T2">(6/18) </text:span> ⲛ ⲟⲩⲁⲅⲅⲉⲗⲟⲥ ⲛ ⲣⲉϥⲛⲁⲩ ⲉ ⲛⲟⲩ[ⲛⲉ] <text:line-break/><text:span text:style-name="T1"> </text:span><text:span text:style-name="T2">(6/19) </text:span> ⲁⲩⲱ ⲁⲓ̈ⲁϩⲉⲣⲁⲧ’ ϩⲓϫⲛ ⲡⲓϩⲟⲩⲉ[ⲓⲧ] <text:line-break/><text:span text:style-name="T1"> </text:span><text:span text:style-name="T2">(6/20) </text:span> ⲉⲧⲉ ⲡⲓⲙⲉϩϥⲧⲟⲟⲩ ⲛⲛ ⲉⲱⲛ ⲡ[ⲉ] <text:line-break/><text:span text:style-name="T1"> </text:span><text:span text:style-name="T2">(6/21) </text:span> ⲙⲛ ⲛⲓⲯⲩⲭⲏ ⲁⲉⲓⲥⲙ[ⲟ]ⲩ ⲉ ⲡⲓ[ⲁⲩⲧⲟ]‐ <text:line-break/><text:span text:style-name="T1"> </text:span><text:span text:style-name="T2">(6/22) </text:span> ⲅⲉⲛⲏⲥ ⲛ ⲛⲟⲩ̣ⲧⲉ· ⲙⲛ ⲡⲓ̣ϣ̣[ⲟⲣⲡ ⲛ] <text:line-break/><text:span text:style-name="T1"> </text:span><text:span text:style-name="T2">(6/23) </text:span> ⲉⲓⲱⲧ’· ⲡ̅ⲓ̅ⲅ̅ⲉ̅ⲣ̅ⲁ̅ⲇ̅ⲁ̣̅̅ⲙ̅ⲁ̅ ⲟ̣[ⲩ ⲃⲁⲗ ⲛⲧⲉ] <text:line-break/><text:span text:style-name="T1"> </text:span><text:span text:style-name="T2">(6/24) </text:span> ⲡⲓⲁⲩⲧⲟⲅⲉⲛⲏⲥ ⲡⲓϣⲟ̣ⲣ̣[ⲡ ⲛ ⲣⲱⲙⲉ] <text:line-break/><text:span text:style-name="T1"> </text:span><text:span text:style-name="T2">(6/25) </text:span> ⲛ ⲧⲉⲗⲓⲟⲥ ⲙⲛ̣ ⲥⲏⲑ ⲉⲙⲙ[ⲁⲭⲁ ⲥⲏⲑ] <text:line-break/><text:span text:style-name="T1"> </text:span><text:span text:style-name="T2">(6/26) </text:span> ⲡϣⲏⲣⲉ̣ [ⲛ]ⲧⲉ [ⲁ̅]̅ϫ̣̅̅ⲁ̣̅̅ⲙ̅ⲁ̅ⲥ̣̅̅ ⲡ[ⲉⲓⲱⲧ ⲛⲧⲉ] <text:line-break/><text:span text:style-name="T1"> </text:span><text:span text:style-name="T2">(6/27) </text:span> ϯⲅⲉ[ⲛⲉⲁ ⲛ]ⲛ̣ [ⲁⲧ]ⲕ̣ⲓ̣ⲙ̣ ⲙ̣ⲛ̣ ⲛ̣[ⲓϥⲧⲟ]‐ <text:line-break/><text:span text:style-name="T1"> </text:span><text:span text:style-name="T2">(6/28) </text:span> ⲟⲩ ⲛ [ⲫⲱⲥⲧⲏⲣ] .ⲥ.ⲏ· .[..... <text:line-break/><text:span text:style-name="T1"> </text:span><text:span text:style-name="T2">(6/29) </text:span> ⲙ̣ [..........]ⲉ̣̅ⲙ̣̅[.].[ <text:line-break/><text:span text:style-name="T1"> </text:span><text:span text:style-name="T2">(6/30) </text:span> ⲙⲛ ⲙⲓⲣⲟⲑⲉⲁ ⲧⲙⲁⲁ̣[ⲩ ....... <text:line-break/><text:span text:style-name="T1"> </text:span><text:span text:style-name="T2">(6/31) </text:span> ⲧⲉⲣ̣ ⲙⲛ ⲡⲣⲟⲫⲁⲛⲓⲁ [........ <text:line-break/><text:span text:style-name="T1"> </text:span><text:span text:style-name="T2">(6/32) </text:span> ⲛⲧⲉ ⲛⲓⲟⲩⲟⲉⲓⲛ ⲙⲛ ⲡⲇ̣̅ⲏ̅[....... <text:line-break/><text:soft-page-break/><text:span text:style-name="T1"> </text:span><text:span text:style-name="T2">(7/1) </text:span> .ⲏ̣.[.....]ⲱ̣.ⲁ[...]ⲟⲥ· ⲁⲩⲱ ⲁⲉⲓ‐ <text:line-break/><text:span text:style-name="T1"> </text:span><text:span text:style-name="T2">(7/2) </text:span> [ϫⲓ] ⲱ̣[ⲙⲥ ⲙ ⲡⲓ]ⲙ̣ⲉϩⲥⲉ̣[ⲡ’ ⲥ]ⲛⲁⲩ ⲉ ⲡⲣⲁⲛ <text:line-break/><text:span text:style-name="T1"> </text:span><text:span text:style-name="T2">(7/3) </text:span> [ⲛ]ⲧⲉ̣ ⲡⲓⲁⲩⲧⲟⲅⲉⲛ[ⲏ]ⲥ ⲛ ⲛⲟⲩⲧⲉ ⲉⲃⲟⲗ <text:line-break/><text:span text:style-name="T1"> </text:span><text:span text:style-name="T2">(7/4) </text:span> ϩⲓ̣ⲧⲟⲟⲧⲟⲩ ⲛ ⲛⲉⲓ̈ϭⲟⲙ ⲛ ⲟⲩⲱⲧ’ ⲁⲉⲓ‐ <text:line-break/><text:span text:style-name="T1"> </text:span><text:span text:style-name="T2">(7/5) </text:span> ϣⲱⲡⲉ ⲛ ⲟⲩⲁⲅⲅⲉⲗⲟⲥ ⲛ ⲅⲉⲛⲟⲥ {ⲛ ⲅⲉ‐} <text:line-break/><text:span text:style-name="T1"> </text:span><text:span text:style-name="T2">(7/6) </text:span> {ⲛⲟⲥ} ⲛ ϩⲟⲟⲩⲧ’· ⲁⲩ[ⲱ] ⲁ̣ⲉⲓⲁϩⲉⲣⲁⲧ’ ϩⲓ‐ <text:line-break/><text:span text:style-name="T1"> </text:span><text:span text:style-name="T2">(7/7) </text:span> ϫⲛ̣ ⲡⲓⲙⲉϩⲥⲛⲁⲩ ⲛⲛ ⲉⲱⲛ ⲉⲧⲉ ⲡⲓ‐ <text:line-break/><text:span text:style-name="T1"> </text:span><text:span text:style-name="T2">(7/8) </text:span> ⲙ̣[ⲉϩ]ϣⲟⲙⲧ’ ⲡⲉ ⲙⲛ ⲛϣⲏⲣⲉ ⲛⲧⲉ <text:line-break/><text:span text:style-name="T1"> </text:span><text:span text:style-name="T2">(7/9) </text:span> [ⲥ]ⲏ̣ⲑ ⲁⲉⲓⲥⲙⲟⲩ ⲉ ⲛⲁⲓ̈ ⲛⲁⲓ̈ ⲁⲩⲱ ⲁⲉⲓ̣‐ <text:line-break/><text:span text:style-name="T1"> </text:span><text:span text:style-name="T2">(7/10) </text:span> [ϫⲓ] ⲱⲙⲥ ⲙ ⲡⲓⲙⲉϩϣⲟⲙⲧ’ ⲛ ⲥⲟⲡ ⲉ <text:line-break/><text:span text:style-name="T1"> </text:span><text:span text:style-name="T2">(7/11) </text:span> ⲡⲣⲁⲛ ⲙ ⲡⲓⲁⲩⲧⲟⲅⲉⲛⲏⲥ ⲛ ⲛⲟⲩⲧⲉ <text:line-break/><text:span text:style-name="T1"> </text:span><text:span text:style-name="T2">(7/12) </text:span> ⲉⲃⲟⲗ ϩⲓⲧⲟ̣ⲟⲧⲟⲩ ⲛ ⲛⲉⲓ̈ϭⲟⲙ ⲛⲉⲓ̈ϭⲟⲙ <text:line-break/><text:span text:style-name="T1"> </text:span><text:span text:style-name="T2">(7/13) </text:span> [ⲁⲓ̈]ϣ̣ⲱⲡⲉ ⲛ ⲟⲩⲁⲅⲅⲉⲗⲟⲥ ⲉϥⲟⲩ̣ⲁⲁⲃ <text:line-break/><text:span text:style-name="T1"> </text:span><text:span text:style-name="T2">(7/14) </text:span> [ⲁ]ⲉⲓ[ⲁ]ϩⲉ̣ⲣⲁⲧ’̣ ϩⲓϫⲛ ⲡⲓⲙⲉϩ{ⲥⲛⲁⲩ} →ⲅ̅← <text:line-break/><text:span text:style-name="T1"> </text:span><text:span text:style-name="T2">(7/15) </text:span> [ⲛ ⲉⲱ]ⲛ· ⲉ[ⲧ]ⲉ ⲡⲓⲙⲉϩⲥⲛⲁⲩ ⲡⲉ ⲁⲉⲓ‐ <text:line-break/><text:span text:style-name="T1"> </text:span><text:span text:style-name="T2">(7/16) </text:span> [ⲥⲙⲟ]ⲩ̣ ⲉ [ⲛ]ⲁ̣ⲓ̈ ⲛⲁⲓ̈· ⲁⲩⲱ ⲁⲉⲓϫⲓ ⲱ̣ⲙⲥ <text:line-break/><text:span text:style-name="T1"> </text:span><text:span text:style-name="T2">(7/17) </text:span> [ⲙ ⲡⲓⲙⲉϩ]ⲇ̅ ⲛ ⲥⲟ̣ⲡ’ ⲉⲃⲟⲗ ϩⲓⲧⲟⲟⲧⲟⲩ <text:line-break/><text:span text:style-name="T1"> </text:span><text:span text:style-name="T2">(7/18) </text:span> [ⲛ ⲛⲉⲓ̈ϭⲟⲙ ⲛ]ⲉ̣ⲓ̈[ϭ]ⲟⲙ ⲁⲓ̈ϣⲱⲡⲉ ⲛ <text:line-break/><text:span text:style-name="T1"> </text:span><text:span text:style-name="T2">(7/19) </text:span> [ⲟⲩⲁⲅⲅⲉⲗⲟ]ⲥ̣ ⲛ̣ ⲧⲉⲗⲓⲟⲥ· ⲁⲩⲱ <text:line-break/><text:span text:style-name="T1"> </text:span><text:span text:style-name="T2">(7/20) </text:span> [ⲁⲓ̈ⲁϩⲉⲣⲁⲧ’ ϩⲓϫⲙ] ⲡ̣ⲓⲙⲉϩϥⲧⲟⲟⲩ ⲉ‐ <text:line-break/><text:span text:style-name="T1"> </text:span><text:span text:style-name="T2">(7/21) </text:span> [ⲧⲉ ⲡⲓϩⲟⲩⲉⲓⲧ ⲡⲉ ⲛ]ⲛ ⲉⲱⲛ ⲁⲩⲱ ⲁⲉⲓ‐ <text:line-break/><text:span text:style-name="T1"> </text:span><text:span text:style-name="T2">(7/22) </text:span> [ⲥⲙⲟⲩ ⲉ ⲛⲁⲓ̈ ⲛⲁⲓ̈· ⲧ]ⲟⲧⲉ ⲁ̣ⲉⲓϣⲓⲛⲉ <text:line-break/><text:span text:style-name="T1"> </text:span><text:span text:style-name="T2">(7/23) </text:span> [.............]ⲉϥⲏ[...]. ⲁⲉⲓϫⲉ <text:line-break/><text:span text:style-name="T1"> </text:span><text:span text:style-name="T2">(7/24) </text:span> [ ]ⲉ ⲁⲛⲟⲕ <text:line-break/><text:span text:style-name="T1"> </text:span><text:span text:style-name="T2">(7/25) </text:span> [ ]. ⲛ̣ⲧⲉ <text:line-break/><text:span text:style-name="T1"> </text:span><text:span text:style-name="T2">(7/26) </text:span> [ ]ⲁ̣ⲛ̣ⲟⲕ <text:line-break/><text:span text:style-name="T1"> </text:span><text:span text:style-name="T2">(7/27) </text:span> [.........]ⲉ̣ ⲙⲙⲟϥ [.....]ⲧ̣ⲉⲡⲓ <text:line-break/><text:span text:style-name="T1"> </text:span><text:span text:style-name="T2">(7/28) </text:span> [.........] ⲉⲧⲃⲉ ⲟⲩ [....]ⲛⲉ ϩⲉⲛ‐ <text:line-break/><text:span text:style-name="T1"> </text:span><text:span text:style-name="T2">(7/29) </text:span> [....]ⲣ̣[..]. ϩⲛ ϯϭⲟⲙ [.....]ⲧⲙ <text:line-break/><text:span text:style-name="T1"> </text:span><text:span text:style-name="T2">(7/30) </text:span> ⲉⲣⲟⲟⲩ ⲛ ⲕⲉⲣⲏⲧⲉ ϩⲛ ⲛⲓⲥ̣ⲱ̣ⲧⲙ <text:line-break/><text:span text:style-name="T1"> </text:span><text:span text:style-name="T2">(8/1) </text:span> ⲛⲧⲉ ⲛⲓⲣⲱⲙ[ⲉ] ⲁ̣ⲩⲱ [ⲛⲁⲓ̈ ⲛ]ⲁ̣ⲓ̈ ⲛⲉ [ⲛⲉ]ⲩ‐ <text:line-break/><text:span text:style-name="T1"> </text:span><text:span text:style-name="T2">(8/2) </text:span> ϭⲟⲙ· ⲏ%0 ⲛⲁⲓ̣̈ ⲣ̣[ⲱ] ⲛⲉ ⲛⲉⲩⲣⲁⲛ ⲇ̣ⲉ ⲥⲉϣⲉ‐ <text:line-break/><text:span text:style-name="T1"> </text:span><text:span text:style-name="T2">(8/3) </text:span> ⲃⲓⲏⲟⲩⲧ’ ⲉ ⲛⲉⲩ̣ⲉⲣⲏⲩ· ⲁⲩⲱ ⲉϣϫⲉ ⲟⲩ <text:line-break/><text:span text:style-name="T1"> </text:span><text:span text:style-name="T2">(8/4) </text:span> ⲛ ⲯⲩⲭⲏ ϣⲉⲃⲓⲏⲟⲩⲧ’ ⲉ ⲯⲩⲭⲏ· ⲁⲩⲱ <text:line-break/><text:span text:style-name="T1"> </text:span><text:span text:style-name="T2">(8/5) </text:span> ⲉⲧⲃⲉ ⲟⲩ ⲉⲣⲉⲛⲓⲣⲱⲙⲉ ϣⲉⲃⲓⲏⲟⲩⲧ’ <text:line-break/><text:span text:style-name="T1"> </text:span><text:span text:style-name="T2">(8/6) </text:span> ⲉ ⲛⲉⲩⲉⲣⲏⲩ ϩⲛ̣ ⲟⲩ ⲏ%0 ⲟⲩⲏⲣ ⲣⲱ ⲛ ⲣⲱ‐ <text:line-break/><text:span text:style-name="T1"> </text:span><text:span text:style-name="T2">(8/7) </text:span> ⲙⲉ ⲛⲉ· ⲁⲩⲱ ⲡⲉϫⲁϥ ⲛⲁⲓ̈ ⲛ[ϭⲓ] ⲡⲓⲛⲟϭ <text:line-break/><text:span text:style-name="T1"> </text:span><text:span text:style-name="T2">(8/8) </text:span> ⲉⲧⲁⲙⲁϩⲧⲉ ⲙ ⲡϫⲓⲥⲉ ⲁ̅ⲩ̅ⲑ̣̅̅ⲣ̣̅̅ⲟ̅ⲩ̅ⲛ̅ⲓ̅ⲟ̅ⲥ̅ <text:line-break/><text:span text:style-name="T1"> </text:span><text:span text:style-name="T2">(8/9) </text:span> ϫⲉ ⲉϣϫⲉ ⲉⲕⲕⲱⲧⲉ ⲙⲉⲛ ⲛⲥⲁ ⲛⲏ <text:line-break/><text:span text:style-name="T1"> </text:span><text:span text:style-name="T2">(8/10) </text:span> ⲉⲧⲁⲕⲥⲓⲛⲉ ⲉⲃⲟⲗ ⲛϩⲏⲧⲟⲩ· ⲏ̣%0 ⲉ̣‐ <text:line-break/><text:span text:style-name="T1"> </text:span><text:span text:style-name="T2">(8/11) </text:span> ⲧⲃⲉ ⲡⲉⲓ̈ⲕⲁϩ ⲛⲛ ⲁⲏⲣ ϫⲉ ⲉⲧⲃⲉ ⲟⲩ ⲟⲩ̣ⲛ‐ <text:line-break/><text:span text:style-name="T1"> </text:span><text:span text:style-name="T2">(8/12) </text:span> ⲧⲁϥ ⲡⲉⲓ̈ⲧⲩⲡⲟⲥ ⲛ̅ ⲕⲟⲥ̣ⲙⲓⲕⲟⲛ· ⲏ%0 [ⲉ]‐ <text:line-break/><text:span text:style-name="T1"> </text:span><text:span text:style-name="T2">(8/13) </text:span> ⲧⲃⲉ ⲛⲓⲁⲛⲧⲓⲧⲩⲡⲟⲥ ⲛⲛ ⲉⲱⲛ ϫⲉ [ⲟⲩ]‐ <text:line-break/><text:span text:style-name="T1"> </text:span><text:span text:style-name="T2">(8/14) </text:span> ⲏⲣ ⲡ̣ⲉ· ⲏ%0 ⲉⲧⲃⲉ ⲟⲩ ⲛⲥⲉⲙⲟⲕϩ̣ [ⲁⲛ] <text:line-break/><text:span text:style-name="T1"> </text:span><text:span text:style-name="T2">(8/15) </text:span> ⲏ%0 ⲉⲧⲃⲉ ϯⲡⲁⲣⲟⲓⲕⲏⲥ[ⲓ]ⲥ ⲙⲛ [ϯⲙⲉⲧⲁ]‐ ‐ <text:line-break/><text:span text:style-name="T1"> </text:span><text:span text:style-name="T2">(8/16) </text:span> ⲛⲟⲓⲁ ⲙⲛ ⲉⲧⲃⲉ ϯⲕⲧ[ⲓⲥ]ⲓ̣ⲥ ⲛⲛ̣ [ⲉⲱⲛ] <text:line-break/><text:span text:style-name="T1"> </text:span><text:span text:style-name="T2">(8/17) </text:span> ⲙⲛ ⲡⲓⲕⲟⲥⲙⲟⲥ ⲉⲧⲉ ⲛ[ⲓ]ⲣ̣[........ <text:line-break/><text:soft-page-break/><text:span text:style-name="T1"> </text:span><text:span text:style-name="T2">(8/18) </text:span> ⲟⲛⲧⲱⲥ· ϩⲛ 〈ⲟⲩ〉ⲟⲩⲱⲛϩ ⲉ̣ⲃ̣[ⲟⲗ .....ⲙ] <text:line-break/><text:span text:style-name="T1"> </text:span><text:span text:style-name="T2">(8/19) </text:span> ⲙⲟⲕ· ⲉⲧⲃⲉ ⲛ[ <text:line-break/><text:span text:style-name="T1"> </text:span><text:span text:style-name="T2">(8/20) </text:span> ⲙⲙⲟⲓ̈ ⲉⲣⲟⲟ[ⲩ <text:line-break/><text:span text:style-name="T1"> </text:span><text:span text:style-name="T2">(8/21) </text:span> ⲟⲩⲧⲉ ⲟⲩⲉϩ[ <text:line-break/><text:span text:style-name="T1"> </text:span><text:span text:style-name="T2">(8/22) </text:span> ⲛⲁⲕ ⲉⲃⲟⲗ· ⲁ[ ⲡ̅ⲛ̅ⲁ̅ ⲛ̅] <text:line-break/><text:span text:style-name="T1"> </text:span><text:span text:style-name="T2">(8/23) </text:span> ⲛ ⲁⲧⲛⲁ̣ⲩ ⲉⲣ[ⲟϥ <text:line-break/><text:span text:style-name="T1"> </text:span><text:span text:style-name="T2">(8/24) </text:span> ⲙⲛ ϯ̣[...]ⲱⲉ̣[ <text:line-break/><text:span text:style-name="T1"> </text:span><text:span text:style-name="T2">(8/25) </text:span> ⲛⲧⲉ [ <text:line-break/><text:span text:style-name="T1"> </text:span><text:span text:style-name="T2">(8/26) </text:span> ⲙⲟⲥ̣ [ <text:line-break/><text:span text:style-name="T1"> </text:span><text:span text:style-name="T2">(8/27) </text:span> ⲏ̅ [ <text:line-break/><text:span text:style-name="T1"> </text:span><text:span text:style-name="T2">(8/28) </text:span> ⲉⲧ[....]ⲗⲡ’ ⲛ[..]ⲕ [......... <text:line-break/><text:span text:style-name="T1"> </text:span><text:span text:style-name="T2">(8/29) </text:span> ⲁⲩⲱ̣ [..]ⲙⲁⲓ̈ ϩⲱ· [.......... <text:line-break/><text:span text:style-name="T1"> </text:span><text:span text:style-name="T2">(8/30) </text:span> ⲛⲉ[....]ⲏ ⲉⲧⲁⲓ̈ⲥ.[......... <text:line-break/><text:span text:style-name="T1"> </text:span><text:span text:style-name="T2">(9/1) </text:span> ⲡⲉϫ[ⲁϥ ⲛⲁⲓ̈ ⲛ]ϭⲓ ⲡⲓⲛ[ⲟϭ] ⲉⲧⲁⲙⲁϩⲧⲉ <text:line-break/><text:span text:style-name="T1"> </text:span><text:span text:style-name="T2">(9/2) </text:span> ⲙ ⲡ[ϫⲓ]ⲥ̣ⲉ ⲁ̅ⲩ̅ⲑ̅ⲣ̅ⲟ̅ⲩ̣̅̅ⲛ̣̅̅ⲓ̅ⲟ̅ⲥ̅ ϫⲉ ⲡⲕⲁϩ <text:line-break/><text:span text:style-name="T1"> </text:span><text:span text:style-name="T2">(9/3) </text:span> ⲙⲉⲛ ⲛⲛ ⲁⲏⲣ ⲁϥϩϣⲱⲡⲉ ϩⲛ ⲟ̣ⲩ‐· <text:line-break/><text:span text:style-name="T1"> </text:span><text:span text:style-name="T2">(9/4) </text:span> ϣⲁϫⲉ· ⲛⲓϫⲡⲟ ⲇⲉ ⲙⲛ ⲛⲏ ⲉⲧ’ⲧⲁ‐ <text:line-break/><text:span text:style-name="T1"> </text:span><text:span text:style-name="T2">(9/5) </text:span> ⲕⲏⲟⲩⲧ’ ⲉϥⲟⲩⲱⲛϩ ⲙⲙⲟⲟⲩ ⲉⲃⲟⲗ <text:line-break/><text:span text:style-name="T1"> </text:span><text:span text:style-name="T2">(9/6) </text:span> ϩⲛ ⲟⲩⲙⲛⲧ’ⲁⲧ’ⲧⲁⲕⲟ[·] ⲉⲧⲃⲉ ⲡⲓ ⲉϩⲣⲁⲓ̈ <text:line-break/><text:span text:style-name="T1"> </text:span><text:span text:style-name="T2">(9/7) </text:span> ⲛⲧⲉ ⲛⲓⲛⲟϭ ⲛ ⲕⲣⲓⲧⲏⲥ· ϩⲓⲛⲁ ϫⲉ ⲛⲛⲟⲩ‐ <text:line-break/><text:span text:style-name="T1"> </text:span><text:span text:style-name="T2">(9/8) </text:span> ϫⲓ ϯⲡⲉ ⲛⲛ ⲉⲥⲑⲏⲥⲓⲥ ⲁⲩⲱ ⲛⲥⲉⲧⲙ‐ <text:line-break/><text:span text:style-name="T1"> </text:span><text:span text:style-name="T2">(9/9) </text:span> ⲱⲣⲃ [ϩ]ⲛ ϯⲕⲧⲓⲥⲓⲥ· ⲉⲧⲁⲩⲉⲓ ⲇⲉ ⲉϩⲣⲁⲓ̈ <text:line-break/><text:span text:style-name="T1"> </text:span><text:span text:style-name="T2">(9/10) </text:span> ⲉϫⲙ ⲡⲁⲓ̈· ⲁⲩⲱ ⲉⲧⲁⲩⲛⲁⲩ ⲉⲃⲟⲗ ϩⲓⲧⲙ <text:line-break/><text:span text:style-name="T1"> </text:span><text:span text:style-name="T2">(9/11) </text:span> ⲡⲁⲓ̈ ⲉ ⲛⲓϩⲃⲏⲩⲉ ⲛⲧⲉ ⲡⲓⲕⲟⲥⲙⲟⲥ ⲉⲩ‐ <text:line-break/><text:span text:style-name="T1"> </text:span><text:span text:style-name="T2">(9/12) </text:span> ϯ ϩⲁⲡ’ ⲉ ⲡⲉϥⲁⲣⲭⲱⲛ ⲉϩⲣⲁⲓ̈ ⲉⲩⲧⲁⲕⲟ <text:line-break/><text:span text:style-name="T1"> </text:span><text:span text:style-name="T2">(9/13) </text:span> ⲉ̣ⲩⲧⲩⲡⲟ̣ⲥ ⲡⲉ ⲛⲧⲉ ⲡⲕⲟⲥⲙⲟ̣ⲥ ⲉⲩ <text:line-break/><text:span text:style-name="T1"> </text:span><text:span text:style-name="T2">(9/14) </text:span> [...].ⲁⲧⲉ̣ ⲙⲛ ⲟⲩⲁⲣⲭⲏ ⲛⲧⲉ ϯϩⲩⲗⲏ <text:line-break/><text:span text:style-name="T1"> </text:span><text:span text:style-name="T2">(9/15) </text:span> [ⲉⲧϫ]ⲡⲟ ⲛ ⲕ̣ⲁ̣ⲕⲉ ⲉⲧ’ⲧⲁⲕⲏⲟⲩⲧ’· <text:line-break/><text:span text:style-name="T1"> </text:span><text:span text:style-name="T2">(9/16) </text:span> [ⲛⲁⲓ̈] ⲛⲁⲓ̈ ⲇ[ⲉ] ϯⲥⲟⲫⲓⲁ ⲉⲧⲁⲥϭⲱϣⲧ <text:line-break/><text:span text:style-name="T1"> </text:span><text:span text:style-name="T2">(9/17) </text:span> [ⲉⲣⲟⲟⲩ] ⲁⲥⲧⲁⲩⲉ ⲡⲓⲕⲁⲕⲉ ⲉⲥ‐ <text:line-break/><text:span text:style-name="T1"> </text:span><text:span text:style-name="T2">(9/18) </text:span> [.......]...ⲕⲏ ϩⲁⲧⲟⲟⲧϥ ⲙ ⲡⲓ‐ <text:line-break/><text:span text:style-name="T1"> </text:span><text:span text:style-name="T2">(9/19) </text:span> [........ⲟⲩⲧ]ⲩⲡⲟⲥ ⲡⲉ ⲛⲛⲁ‐ <text:line-break/><text:span text:style-name="T1"> </text:span><text:span text:style-name="T2">(9/20) </text:span> [ ] ⲛ̣ⲧⲉ ϯⲟⲩⲥⲓⲁ ⲛ <text:line-break/><text:span text:style-name="T1"> </text:span><text:span text:style-name="T2">(9/21) </text:span> [ ]ⲙⲟⲣⲫⲏ ⲛⲛ ⲁⲧ’‐ <text:line-break/><text:span text:style-name="T1"> </text:span><text:span text:style-name="T2">(9/22) </text:span> [ ].ⲉⲩ̣ⲉ̣ⲓⲇⲟⲥ ⲛ <text:line-break/><text:span text:style-name="T1"> </text:span><text:span text:style-name="T2">(9/23) </text:span> [ ]ⲁ̣ⲓⲉⲕⲟ <text:line-break/><text:span text:style-name="T1"> </text:span><text:span text:style-name="T2">(9/24) </text:span> [ ] ⲡⲧⲏⲣϥ <text:line-break/><text:span text:style-name="T1"> </text:span><text:span text:style-name="T2">(9/25) </text:span> [ ]ⲟ̣ⲉⲧ’ <text:line-break/><text:span text:style-name="T1"> </text:span><text:span text:style-name="T2">(9/26) </text:span> [ ].[.....]ϭ̣ⲉ <text:line-break/><text:span text:style-name="T1"> </text:span><text:span text:style-name="T2">(9/27) </text:span> [........].[.]ⲕⲁⲕⲉ· [....]ⲟ̣ ⲉⲃⲟⲗ <text:line-break/><text:span text:style-name="T1"> </text:span><text:span text:style-name="T2">(9/28) </text:span> [......]ϣⲁϫⲉ ⲉⲙ[...]ⲓ̣ϭⲟⲙ <text:line-break/><text:span text:style-name="T1"> </text:span><text:span text:style-name="T2">(9/29) </text:span> [..... ⲉ]ⲱⲛ ⲛⲧⲉ̣ [ϯⲕⲧⲓ]ⲥⲓⲥ ⲉ <text:line-break/><text:span text:style-name="T1"> </text:span><text:span text:style-name="T2">(9/30) </text:span> ⲛ̣ⲁⲩ ⲉⲩⲗⲁⲁⲩ ⲛⲧⲉ ⲛⲓ̣[ϣⲁ] ⲉⲛⲉϩ̣ <text:line-break/><text:span text:style-name="T1"> </text:span><text:span text:style-name="T2">(10/1) </text:span> ⲁϥⲛⲁⲩ ⲉⲩ[ⲉⲓ]ⲇⲱⲗ[ⲟⲛ ⲁⲩ]ⲱ̣ ⲡⲣⲟⲥ <text:line-break/><text:span text:style-name="T1"> </text:span><text:span text:style-name="T2">(10/2) </text:span> ⲡⲓⲉⲓⲇⲱⲗ[ⲟⲛ] ⲉⲧⲁϥ[ⲛⲁⲩ ⲉⲣⲟ]ϥ ⲉⲧⲛ‐ <text:line-break/><text:span text:style-name="T1"> </text:span><text:span text:style-name="T2">(10/3) </text:span> ϩⲣⲁⲓ̈ ⲛϩⲏⲧϥ [ⲁϥ]ⲧⲁⲙⲓⲟ ⲙ ⲡⲕⲟⲥⲙⲟⲥ· <text:line-break/><text:span text:style-name="T1"> </text:span><text:span text:style-name="T2">(10/4) </text:span> ⲁⲩⲱ ϩⲛ ⲟⲩⲉⲓⲇⲱⲗⲟⲛ ⲛⲧⲉ ⲟⲩⲉⲓ‐ <text:line-break/><text:soft-page-break/><text:span text:style-name="T1"> </text:span><text:span text:style-name="T2">(10/5) </text:span> ⲇⲱⲗⲟⲛ ⲁϥⲣ ϩⲱⲃ ⲉ ⲡⲕⲟⲥⲙⲟⲥ· <text:line-break/><text:span text:style-name="T1"> </text:span><text:span text:style-name="T2">(10/6) </text:span> ⲁⲩⲱ ⲡⲓⲕⲉⲉⲓⲇⲱⲗⲟⲛ ⲛⲧⲉ ⲡⲟⲩ‐ <text:line-break/><text:span text:style-name="T1"> </text:span><text:span text:style-name="T2">(10/7) </text:span> ⲱⲛϩ ⲉⲃⲟⲗ ⲁⲩϥⲓⲧϥ ⲛⲧⲟⲟⲧϥ· ⲉⲧⲁⲩ‐ <text:line-break/><text:span text:style-name="T1"> </text:span><text:span text:style-name="T2">(10/8) </text:span> ϯ ⲇⲉ ⲛ ⲟⲩⲙⲁ ⲛ ⲙⲧⲟⲛ ⲛ ϯⲥⲟⲫⲓⲁ <text:line-break/><text:span text:style-name="T1"> </text:span><text:span text:style-name="T2">(10/9) </text:span> ⲛ ⲧϣⲉⲃⲓⲱ ⲛ ⲧⲉⲥⲙⲉⲧⲁⲛⲟⲓⲁ· ⲉⲃⲟⲗ <text:line-break/><text:span text:style-name="T1"> </text:span><text:span text:style-name="T2">(10/10) </text:span> ⲇⲉ ϩⲙ ⲡⲁⲓ̈ ⲉⲙⲛ ⲗⲁⲁⲩ ϩⲣⲁⲓ̈ ⲛϩⲏⲧⲥ ⲛ <text:line-break/><text:span text:style-name="T1"> </text:span><text:span text:style-name="T2">(10/11) </text:span> ϣⲟⲣⲡ’ ⲛ ⲉⲓⲇⲱⲗⲟⲛ ⲉϥⲧⲃⲃⲏⲟⲧ <text:line-break/><text:span text:style-name="T1"> </text:span><text:span text:style-name="T2">(10/12) </text:span> ⲛϩⲣⲁⲓ̈ ⲛϩⲏⲧϥ ⲡⲣ[ⲱ]ⲟⲛ ⲏ ϩⲏⲇⲏ ⲉⲧⲁⲩ‐ <text:line-break/><text:span text:style-name="T1"> </text:span><text:span text:style-name="T2">(10/13) </text:span> ϣⲱⲡⲉ ⲉⲃⲟⲗ ϩⲓⲧⲟⲟ̣ⲧϥ· ⲁϥⲣ ⲫⲁⲛ‐ <text:line-break/><text:span text:style-name="T1"> </text:span><text:span text:style-name="T2">(10/14) </text:span> ⲧⲁⲍⲉⲥⲑⲁⲓ ⲁϥⲣ ϩⲱⲃ ⲉ ⲛ[ⲓ]ⲕⲉ̣[ϣ]ⲱϫⲡ’ <text:line-break/><text:span text:style-name="T1"> </text:span><text:span text:style-name="T2">(10/15) </text:span> ⲛ ⲟ[ⲩ]ⲟⲉⲓϣ ⲅⲁⲣ ⲛⲓⲙ ⲉ̣ⲥⲧⲁ[ⲕⲏⲟⲩ]ⲧ’ <text:line-break/><text:span text:style-name="T1"> </text:span><text:span text:style-name="T2">(10/16) </text:span> ⲛϭⲓ ϯϩⲓⲕⲱⲛ ⲛⲧⲉ [ϯ]ⲥ̣ⲟⲫⲓ̣[ⲁ <text:line-break/><text:span text:style-name="T1"> </text:span><text:span text:style-name="T2">(10/17) </text:span> ⲉⲥⲉ ⲛ ϩⲁⲗϩⲟ· ⲡ[ⲓ]ⲁⲣⲭ̣[ⲱ]ⲛ̣ ⲇⲉ̣[ <text:line-break/><text:span text:style-name="T1"> </text:span><text:span text:style-name="T2">(10/18) </text:span> ⲛⲉ ⲁⲩⲱ →ⲉϥⲣ ⲥⲱⲙ[ⲁ]← ⲉϥⲡⲓ̣[.]. ⲛⲟ̣[ <text:line-break/><text:span text:style-name="T1"> </text:span><text:span text:style-name="T2">(10/19) </text:span> ⲉⲧⲃⲉ ⲡⲓϩⲟⲩⲉ ...[ <text:line-break/><text:span text:style-name="T1"> </text:span><text:span text:style-name="T2">(10/20) </text:span> ⲉⲡⲉⲥⲏⲧ’· ⲉ.[ <text:line-break/><text:span text:style-name="T1"> </text:span><text:span text:style-name="T2">(10/21) </text:span> ⲧⲁⲉⲓⲛⲁⲩ ⲉ[ <text:line-break/><text:span text:style-name="T1"> </text:span><text:span text:style-name="T2">(10/22) </text:span> ⲉⲫⲏⲧ’ ⲛ ⲧⲉ[ <text:line-break/><text:span text:style-name="T1"> </text:span><text:span text:style-name="T2">(10/23) </text:span> ϫⲛ ⲛⲉⲧⲉⲛⲥ̣[ <text:line-break/><text:span text:style-name="T1"> </text:span><text:span text:style-name="T2">(10/24) </text:span> ⲉⲁϥⲕ.[ <text:line-break/><text:span text:style-name="T1"> </text:span><text:span text:style-name="T2">(10/25) </text:span> ⲛⲉⲱ[ <text:line-break/><text:span text:style-name="T1"> </text:span><text:span text:style-name="T2">(10/26) </text:span> ⲛϩⲟⲩ[ <text:line-break/><text:span text:style-name="T1"> </text:span><text:span text:style-name="T2">(10/27) </text:span> ⲛ ⲛ[ <text:line-break/><text:span text:style-name="T1"> </text:span><text:span text:style-name="T2">(10/28) </text:span> ⲁⲩ[....]...[......... <text:line-break/><text:span text:style-name="T1"> </text:span><text:span text:style-name="T2">(10/29) </text:span> ⲧⲉⲗ[ⲓⲟ]ⲥ̣ ⲉⲃⲟⲗ̣ ϩ̣ⲓⲧ[...... <text:line-break/><text:span text:style-name="T1"> </text:span><text:span text:style-name="T2">(10/30) </text:span> ⲡⲓⲣ.[....]ϫ ⲡⲁⲓ̈ ⲉ[....... <text:line-break/><text:span text:style-name="T1"> </text:span><text:span text:style-name="T2">(10/31) </text:span> ⲏⲣ.[....] ⲉⲃⲟⲗ ϩⲓⲧⲟ̣[ⲟ]ⲧ̣ϥ· ⲉⲁϥ[ⲟⲩ] <text:line-break/><text:span text:style-name="T1"> </text:span><text:span text:style-name="T2">(11/1) </text:span> ⲱ̣ⲛ[ϩ ⲉⲃⲟⲗ ⲙ] ⲡⲓⲧⲁ[ⲕ]ⲟ ⲛⲧⲉ ⲡⲕⲟⲥⲙⲟⲥ <text:line-break/><text:span text:style-name="T1"> </text:span><text:span text:style-name="T2">(11/2) </text:span> ϩⲛ ⲟ̣[ⲩⲙⲛⲧ’]ⲁⲧ’[ⲟⲩ[ⲱ]ⲧⲃ ⲉⲃⲟⲗ· ⲛⲓⲁⲛ‐ <text:line-break/><text:span text:style-name="T1"> </text:span><text:span text:style-name="T2">(11/3) </text:span> [ⲧⲓⲧⲩ]ⲡ̣ⲟⲥ ⲇⲉ ⲛⲛ ⲉⲱⲛ ⲉⲩϣ̣ⲟⲟⲡ’ <text:line-break/><text:span text:style-name="T1"> </text:span><text:span text:style-name="T2">(11/4) </text:span> ⲙ ⲡⲉ[ⲓ̈]ⲣⲏⲧⲉ· ⲛⲧⲟⲟⲩ ⲙⲉⲛ ⲙⲡⲟⲩ‐ <text:line-break/><text:span text:style-name="T1"> </text:span><text:span text:style-name="T2">(11/5) </text:span> ϣⲁϣⲛⲓ ⲉⲩⲉⲓⲇⲉⲁ ⲛⲧⲉ ⲟⲩϭⲟⲙ ⲛ <text:line-break/><text:span text:style-name="T1"> </text:span><text:span text:style-name="T2">(11/6) </text:span> ⲟⲩⲱⲧ’· ϩⲉⲛⲉⲟⲟⲩ̣ [ⲛ]ⲉ ⲛ ϣⲁ ⲉⲛⲉϩ <text:line-break/><text:span text:style-name="T1"> </text:span><text:span text:style-name="T2">(11/7) </text:span> ⲉⲧⲛⲧⲁⲩ ⲙⲙⲁⲩ· ⲁⲩⲱ ⲥⲉϣⲟⲟⲡ’ <text:line-break/><text:span text:style-name="T1"> </text:span><text:span text:style-name="T2">(11/8) </text:span> ⲛ ϩⲉⲛⲙⲁ ⲛ ϯ ϩⲁⲡ’ ⲛⲧⲉ ⲧⲟⲩⲉⲓ ⲧⲟⲩ‐ <text:line-break/><text:span text:style-name="T1"> </text:span><text:span text:style-name="T2">(11/9) </text:span> ⲉⲓ ⲛⲧ̣ⲉ ⲛⲓϭⲟⲙ· ⲉϣⲱⲡⲉ ⲇⲉ ⲉⲩϣⲁ̅‐ <text:line-break/><text:span text:style-name="T1"> </text:span><text:span text:style-name="T2">(11/10) </text:span> ϫⲓ ⲟⲩⲟ̣ⲉⲓⲛ ⲛϭⲓ ⲛⲓⲯⲩⲭⲏ ⲉⲃⲟⲗ ϩⲓⲧⲛ <text:line-break/><text:span text:style-name="T1"> </text:span><text:span text:style-name="T2">(11/11) </text:span> ⲡ’ⲟⲩⲟ̣ⲉ̣[ⲓ]ⲛ̣ ⲉⲧ̣ϣⲟⲟⲡ’ ⲛϩⲏⲧⲟⲩ ⲙⲛ <text:line-break/><text:span text:style-name="T1"> </text:span><text:span text:style-name="T2">(11/12) </text:span> ⲡⲓⲧⲩⲡ̣[ⲟⲥ] ⲉⲧ̣ⲉ ϣⲁϥϣⲱⲡⲉ ⲛϩⲏ‐ <text:line-break/><text:span text:style-name="T1"> </text:span><text:span text:style-name="T2">(11/13) </text:span> ⲧⲟⲩ̣ ⲛ [ⲟⲩ]ⲙ̣ⲏⲏϣⲉ ⲛ ⲥⲟⲡ’ ϩⲛ ⲟⲩⲙⲛⲧ’‐ <text:line-break/><text:span text:style-name="T1"> </text:span><text:span text:style-name="T2">(11/14) </text:span> [ⲁ]ⲧ’ϫ[ⲓ] ⲙⲕ[ⲁ]ϩ̣ ⲙ̣ⲁ̣ⲥⲙⲉⲉⲩⲉ ϫⲉ ⲉⲥⲛⲁⲩ <text:line-break/><text:span text:style-name="T1"> </text:span><text:span text:style-name="T2">(11/15) </text:span> [ⲉ .]ⲓⲧⲁ̣[...]ⲙⲉ ⲁ̣ⲩⲱ ⲡⲓϣⲁ ⲉⲛⲉϩ <text:line-break/><text:span text:style-name="T1"> </text:span><text:span text:style-name="T2">(11/16) </text:span> [.]..[....] ϩ̣[ⲙ] ⲡⲓⲙⲁⲕⲁⲣⲓⲟⲥ ⲛ ⲉⲓ‐ <text:line-break/><text:span text:style-name="T1"> </text:span><text:span text:style-name="T2">(11/17) </text:span> [.........] ⲛ ϯⲟⲩⲉⲓ ⲛ ⲟⲩⲱⲧ’ <text:line-break/><text:span text:style-name="T1"> </text:span><text:span text:style-name="T2">(11/18) </text:span> [ ] ⲧⲟⲩⲉⲓ ⲧⲟⲩⲉⲓ ⲛⲧⲉ <text:line-break/><text:span text:style-name="T1"> </text:span><text:span text:style-name="T2">(11/19) </text:span> [ ]. ⲛ ⲟⲩⲟⲉⲓⲛ ⲉⲧ‐ <text:line-break/><text:span text:style-name="T1"> </text:span><text:span text:style-name="T2">(11/20) </text:span> [ ]ⲣⲟⲩ· ⲙⲛ ⲧⲏ ⲙⲉⲛ <text:line-break/><text:soft-page-break/><text:span text:style-name="T1"> </text:span><text:span text:style-name="T2">(11/21) </text:span> [ ]ⲛ ⲧⲏⲣⲥ ⲙⲛ ⲧⲏ <text:line-break/><text:span text:style-name="T1"> </text:span><text:span text:style-name="T2">(11/22) </text:span> [ ]. ⲁⲩⲱ ⲟⲩ‐ <text:line-break/><text:span text:style-name="T1"> </text:span><text:span text:style-name="T2">(11/23) </text:span> [ ] ⲙⲛ ⲧⲏ <text:line-break/><text:span text:style-name="T1"> </text:span><text:span text:style-name="T2">(11/24) </text:span> [ ] ⲧ̣ⲏ ⲉⲧⲉ <text:line-break/><text:span text:style-name="T1"> </text:span><text:span text:style-name="T2">(11/25) </text:span> [ ] ⲧⲏ <text:line-break/><text:span text:style-name="T1"> </text:span><text:span text:style-name="T2">(11/26) </text:span> [ ]. <text:line-break/><text:span text:style-name="T1"> </text:span><text:span text:style-name="T2">(11/27) </text:span> [.........]ⲩⲛ.[......]ⲏ̣ⲧⲉ <text:line-break/><text:span text:style-name="T1"> </text:span><text:span text:style-name="T2">(11/28) </text:span> [.......]ⲏ̣ⲥⲓⲥ· [.......].ⲉ <text:line-break/><text:span text:style-name="T1"> </text:span><text:span text:style-name="T2">(11/29) </text:span> ⲛⲧⲉ ⲧⲙⲉⲧⲁⲛⲟⲓⲁ· ϩ[ⲉⲛ ⲯ]ⲩⲭⲏ <text:line-break/><text:span text:style-name="T1"> </text:span><text:span text:style-name="T2">(12/1) </text:span> ⲕⲁⲧⲁ ϯϭⲟⲙ ⲉⲧⲛ[ⲧⲁⲩ ⲛϩⲏⲧ]ⲟⲩ ⲛ‐ <text:line-break/><text:span text:style-name="T1"> </text:span><text:span text:style-name="T2">(12/2) </text:span> ⲥⲉⲁϩⲉⲣⲁ[ⲧⲟ]ⲩ· ⲁⲩ[..].[.......].[..] <text:line-break/><text:span text:style-name="T1"> </text:span><text:span text:style-name="T2">(12/3) </text:span> ⲑⲉⲃⲓⲏⲟⲩ ϣⲁⲩⲣ ⲅⲩⲙⲛⲁ[ⲍⲉ] ⲙ[ⲙ]ⲟ̣ⲟⲩ <text:line-break/><text:span text:style-name="T1"> </text:span><text:span text:style-name="T2">(12/4) </text:span> ⲉⲃ̣ⲟ̣[ⲗ] ϩⲓⲧⲟⲟⲧⲟⲩ ⲛ ⲛⲓⲁⲛⲧ[ⲓ]ⲧⲩⲡⲟⲥ <text:line-break/><text:span text:style-name="T1"> </text:span><text:span text:style-name="T2">(12/5) </text:span> ⲛⲏ ⲉⲧⲉ ϣⲁⲩϫⲓ ⲛ ⲟⲩⲧⲩⲡⲟⲥ ⲛⲧⲉ <text:line-break/><text:span text:style-name="T1"> </text:span><text:span text:style-name="T2">(12/6) </text:span> ⲛⲉⲩⲯⲩⲭⲏ ⲉⲧⲓ ⲉⲩϣⲟⲟⲡ’ ϩⲙ ⲡⲕⲟ‐ <text:line-break/><text:span text:style-name="T1"> </text:span><text:span text:style-name="T2">(12/7) </text:span> ⲥⲙⲟⲥ ⲙⲛⲛⲥⲁ ϯϩⲓⲏ ⲛ ⲉⲓ ⲉⲃⲟⲗ ⲕⲁ‐ <text:line-break/><text:span text:style-name="T1"> </text:span><text:span text:style-name="T2">(12/8) </text:span> ⲧⲁ ⲡⲟⲩⲁ ⲡⲟⲩⲁ ⲛⲧⲉ ⲛⲓⲉⲱⲛ ϣⲁⲩ‐ <text:line-break/><text:span text:style-name="T1"> </text:span><text:span text:style-name="T2">(12/9) </text:span> ϣⲱⲡⲉ ⲁⲩⲱ ϣⲁⲩⲟⲩⲟⲧ[ⲃ]ⲟ̣ⲩ ⲉⲃⲟⲗ <text:line-break/><text:span text:style-name="T1"> </text:span><text:span text:style-name="T2">(12/10) </text:span> ⲕⲁⲧⲁ ⲡⲟⲩⲁ ⲡⲟⲩⲁ ⲉⲃⲟⲗ ⲙ[ⲉ]ⲛ ϩⲙ ⲡⲓⲁⲛ‐ <text:line-break/><text:span text:style-name="T1"> </text:span><text:span text:style-name="T2">(12/11) </text:span> ⲧⲓⲧⲩⲡⲟⲛ ⲛⲧⲉ ϯⲡⲁⲣⲟ̣ⲓⲕ̣[ⲏ]ⲥⲓⲥ ⲉϩⲣⲁⲓ̈ <text:line-break/><text:span text:style-name="T1"> </text:span><text:span text:style-name="T2">(12/12) </text:span> ⲉ ϯⲟⲛⲧⲱⲥ ⲉⲧ’ϣ[ⲟⲟⲡ’ ⲙ] ⲡⲁⲣⲟⲓⲕⲏ̅ <text:line-break/><text:span text:style-name="T1"> </text:span><text:span text:style-name="T2">(12/13) </text:span> ⲥⲓⲥ· ⲉⲃⲟⲗ ⲙⲉⲛ ϩⲙ ⲡⲓⲁ[ⲛ]ⲧⲓⲧⲩⲡⲟⲛ ⲙ <text:line-break/><text:span text:style-name="T1"> </text:span><text:span text:style-name="T2">(12/14) </text:span> ⲙⲉⲧⲁⲛⲟⲓⲁ ⲉϩⲣⲁⲓ̈ ⲉ ϯ[ⲟⲛ]ⲧ̣ⲱⲥ ⲉ[ⲧ’]ϣⲟ‐ <text:line-break/><text:span text:style-name="T1"> </text:span><text:span text:style-name="T2">(12/15) </text:span> ⲟⲡ’ ⲙ ⲙⲉⲧⲁⲛⲟⲓⲁ [ⲁⲩⲱ ⲉ]ⲃⲟ̣ⲗ ϩ̣[ⲙ ⲡⲓ]ⲁ̣ⲛ̣‐ <text:line-break/><text:span text:style-name="T1"> </text:span><text:span text:style-name="T2">(12/16) </text:span> ⲧⲓⲧⲩⲡⲟⲥ ⲛ ⲁⲩⲧ̣ⲟ[ⲅⲉⲛⲏⲥ] ⲉ[ϩⲣⲁⲓ̈ ⲉ ⲡⲓ]‐ <text:line-break/><text:span text:style-name="T1"> </text:span><text:span text:style-name="T2">(12/17) </text:span> ⲟⲛⲧⲱⲥ ⲉⲧ’ϣⲟ[ⲟ]ⲡ’̣ [ⲛ ⲁⲩⲧ]ⲟ̣ⲅ̣[ⲉⲛⲏⲥ] <text:line-break/><text:span text:style-name="T1"> </text:span><text:span text:style-name="T2">(12/18) </text:span> ⲙⲛ ⲛⲓⲕⲉϣⲱϫⲡ [ <text:line-break/><text:span text:style-name="T1"> </text:span><text:span text:style-name="T2">(12/19) </text:span> ⲛⲓⲯⲩⲭⲏ ⲙⲉⲛ ⲛ .[ <text:line-break/><text:span text:style-name="T1"> </text:span><text:span text:style-name="T2">(12/20) </text:span> ϣⲟⲟⲡ’ ϩⲛ ⲟⲩ.[ <text:line-break/><text:span text:style-name="T1"> </text:span><text:span text:style-name="T2">(12/21) </text:span> ⲟⲩ ⲧⲏⲣⲟⲩ ϩⲓ̣[ ⲛⲓⲁⲛⲧⲓ] <text:line-break/><text:span text:style-name="T1"> </text:span><text:span text:style-name="T2">(12/22) </text:span> ⲧⲩⲡⲟⲥ ⲛⲛ ⲉⲱ̣[ⲛ <text:line-break/><text:span text:style-name="T1"> </text:span><text:span text:style-name="T2">(12/23) </text:span> ⲛⲁⲩ ⲙⲉⲛ ϩⲟⲧ[ <text:line-break/><text:span text:style-name="T1"> </text:span><text:span text:style-name="T2">(12/24) </text:span> ⲁⲩⲱ ϩⲩ[ <text:line-break/><text:span text:style-name="T1"> </text:span><text:span text:style-name="T2">(12/25) </text:span> ⲉⲃⲟⲗ ϩ[ <text:line-break/><text:span text:style-name="T1"> </text:span><text:span text:style-name="T2">(12/26) </text:span> ⲡⲓϣⲁⲩ̣[ <text:line-break/><text:span text:style-name="T1"> </text:span><text:span text:style-name="T2">(12/27) </text:span> ⲥⲁⲃⲟ̣ⲗ̣[ <text:line-break/><text:span text:style-name="T1"> </text:span><text:span text:style-name="T2">(12/28) </text:span> ⲟⲉ.[ <text:line-break/><text:span text:style-name="T1"> </text:span><text:span text:style-name="T2">(12/29) </text:span> ⲛⲁⲉ[........] ⲉⲃ[ <text:line-break/><text:span text:style-name="T1"> </text:span><text:span text:style-name="T2">(12/30) </text:span> ⲛⲧⲉ̣[.......] ⲛ ϣⲱ̣[........ <text:line-break/><text:span text:style-name="T1"> </text:span><text:span text:style-name="T2">(12/31) </text:span> ⲛⲁⲓ̈ [ ]ⲟ̣ⲛⲉ̣[. <text:line-break/><text:span text:style-name="T1"> </text:span><text:span text:style-name="T2">(13/1) </text:span> ⲥⲙ[ⲟⲩ ⲉ ⲡⲛ]ⲟⲩⲧⲉ ⲉⲧ’ⲥⲁϩⲣⲁⲓ̈ ⲛ <text:line-break/><text:span text:style-name="T1"> </text:span><text:span text:style-name="T2">(13/2) </text:span> ⲛⲓⲛ[ⲟϭ ⲛⲛ] ⲉⲱⲛ ⲙⲛ̣ ⲡⲓⲕ̅ⲗ̅ⲥ̅ ⲛⲛ ⲁ‐ <text:line-break/><text:span text:style-name="T1"> </text:span><text:span text:style-name="T2">(13/3) </text:span> [ⲧ]ⲙ[ⲓⲥⲉ] ⲙ̣ⲛ ⲡⲓⲡⲣⲱⲧⲟⲫⲁ[ⲛ]ⲏ̣ⲥ <text:line-break/><text:span text:style-name="T1"> </text:span><text:span text:style-name="T2">(13/4) </text:span> ⲛ ⲛⲟ̣[ϭ ⲛ] ϩⲟⲟⲩⲧ’ ⲙⲛ ⲡⲓⲧⲉⲗⲓⲟⲥ <text:line-break/><text:span text:style-name="T1"> </text:span><text:span text:style-name="T2">(13/5) </text:span> ⲛ ⲁ[ⲗⲟ]ⲩ̣ ⲡⲏ ⲉⲧ’ϫⲟⲥⲉ ⲉ ⲛⲟⲩⲧⲉ <text:line-break/><text:span text:style-name="T1"> </text:span><text:span text:style-name="T2">(13/6) </text:span> ⲙⲛ ⲡⲓⲃⲁⲗ ⲛⲧⲁϥ ⲡ̣̅̅ⲓ̣̅̅ⲅ̣̅̅ⲉ̅ⲣ̅ⲁ̅ⲇ̅ⲁ̅ⲙ̅ⲁ̅ <text:line-break/><text:span text:style-name="T1"> </text:span><text:span text:style-name="T2">(13/7) </text:span> ⲁⲩⲱ ⲁⲉⲓⲙⲟⲩⲧⲉ ⲉϩⲣⲁⲓ̈ ⲟⲩⲉ ⲡⲁ‐ <text:line-break/><text:soft-page-break/><text:span text:style-name="T1"> </text:span><text:span text:style-name="T2">(13/8) </text:span> ⲗⲟⲩ ⲛⲧⲉ ⲡⲁⲗⲟⲩ ⲏ̅ⲫ̅ⲏ̅ⲥ̅ⲏ̅ⲭ̅ ⲁϥⲁϩⲉ‐ <text:line-break/><text:span text:style-name="T1"> </text:span><text:span text:style-name="T2">(13/9) </text:span> ⲣⲁⲧϥ ⲛ̣ⲁⲓ̈ ⲁⲩⲱ ⲡⲉϫⲁϥ ϫⲉ ⲡⲁⲅⲅⲉ‐ <text:line-break/><text:span text:style-name="T1"> </text:span><text:span text:style-name="T2">(13/10) </text:span> ⲗⲟⲥ ⲛⲧ̣ⲉ ⲡⲛⲟ̣ⲩⲧⲉ ⲡⲓϣⲏⲣⲉ ⲛⲧⲉ <text:line-break/><text:span text:style-name="T1"> </text:span><text:span text:style-name="T2">(13/11) </text:span> ⲡⲓⲱⲧ’̣ [ⲡⲉ ⲁⲛⲟ]ⲕ ⲡⲓⲧⲉⲗⲓⲟⲥ ⲛ ⲣⲱ‐ <text:line-break/><text:span text:style-name="T1"> </text:span><text:span text:style-name="T2">(13/12) </text:span> ⲙⲉ ⲉⲧⲃ[ⲉ ⲟⲩ] ⲕⲙⲟⲩⲧⲉ ⲉⲣⲟⲉⲓ ⲁⲩⲱ <text:line-break/><text:span text:style-name="T1"> </text:span><text:span text:style-name="T2">(13/13) </text:span> ⲕ̣ⲕⲱ[ⲧⲉ ⲛⲥ]ⲁ ⲛⲏ ⲉⲧⲕⲉⲓⲙ[ⲉ] ⲉⲣⲟⲟⲩ <text:line-break/><text:span text:style-name="T1"> </text:span><text:span text:style-name="T2">(13/14) </text:span> ⲉⲕ[ⲉ] ⲛ [ⲛⲁⲧⲙⲙ]ⲉ ⲉⲣⲟⲟⲩ· ⲁⲛⲟⲕ <text:line-break/><text:span text:style-name="T1"> </text:span><text:span text:style-name="T2">(13/15) </text:span> [ⲇⲉ] ⲡⲉ̣[ϫⲁⲓ̈ ϫⲉ] ⲁ̣ⲓ̈ⲕⲱⲧⲉ ⲛⲥⲁ ⲡⲓⲙⲟ‐ <text:line-break/><text:span text:style-name="T1"> </text:span><text:span text:style-name="T2">(13/16) </text:span> [ⲟⲩ]ϫϭ̣ [.......] ϥϫⲱⲕ ⲁⲩⲱ ϥϯ <text:line-break/><text:span text:style-name="T1"> </text:span><text:span text:style-name="T2">(13/17) </text:span> [ ]ϫⲉ ⲟⲩⲛ ϭⲟⲙ ⲉⲧⲛ‐ <text:line-break/><text:span text:style-name="T1"> </text:span><text:span text:style-name="T2">(13/18) </text:span> [ⲧⲁ%1 ]ⲉⲧⲛϫⲓ ϫⲱⲕⲙ ⲉⲣⲟ‐ <text:line-break/><text:span text:style-name="T1"> </text:span><text:span text:style-name="T2">(13/19) </text:span> [ ⲛ]ⲉⲓ̈ⲣⲁⲛ ⲥⲉϣⲉ‐ <text:line-break/><text:span text:style-name="T1"> </text:span><text:span text:style-name="T2">(13/20) </text:span> [ⲃⲓⲏⲟⲩⲧ’ ] ⲁⲩⲱ ⲉⲧⲃⲉ ⲟⲩ <text:line-break/><text:span text:style-name="T1"> </text:span><text:span text:style-name="T2">(13/21) </text:span> [ ].ⲟⲩⲧ’ ⲉ ⲛⲉⲩ‐ <text:line-break/><text:span text:style-name="T1"> </text:span><text:span text:style-name="T2">(13/22) </text:span> [ ]ⲟⲥ̣[..]ⲛⲉ ϩⲛ ϯ‐ <text:line-break/><text:span text:style-name="T1"> </text:span><text:span text:style-name="T2">(13/23) </text:span> [........ ⲉ]ⲃⲟⲗ [ϩⲛ ϩⲉ]ⲛⲕⲟⲟⲩⲉ <text:line-break/><text:span text:style-name="T1"> </text:span><text:span text:style-name="T2">(13/24) </text:span> [ ] ⲛ̣ⲓⲣⲱⲙⲉ· <text:line-break/><text:span text:style-name="T1"> </text:span><text:span text:style-name="T2">(13/25) </text:span> [ ϣ]ⲉⲃⲓ‐ <text:line-break/><text:span text:style-name="T1"> </text:span><text:span text:style-name="T2">(13/26) </text:span> [ⲏⲟⲩⲧ’ ]ⲩ· <text:line-break/><text:span text:style-name="T1"> </text:span><text:span text:style-name="T2">(13/27) </text:span> [ ]ⲉ <text:line-break/><text:span text:style-name="T1"> </text:span><text:span text:style-name="T2">(13/28) </text:span> [ ]ⲣ <text:line-break/><text:span text:style-name="T1"> </text:span><text:span text:style-name="T2">(14/1) </text:span> ⲉϥϫⲱ ⲙⲙⲟⲥ ϫⲉ̣ [ⲍ̅ⲱ̅ⲥ̅ⲧ̅]̅ⲣ̅ⲓ̅ⲁ̅ⲛ̅ⲉ̅ <text:line-break/><text:span text:style-name="T1"> </text:span><text:span text:style-name="T2">(14/2) </text:span> ⲥⲱⲧⲙ ⲉⲧⲃⲉ ⲛⲁⲓ̣̈ [......] ϣⲟ‐ <text:line-break/><text:span text:style-name="T1"> </text:span><text:span text:style-name="T2">(14/3) </text:span> ⲙⲧ’ ⲅⲁⲣ ⲛⲉ ⲛⲓϣⲟⲣⲡ’̣ [.......]ⲙ̣ <text:line-break/><text:span text:style-name="T1"> </text:span><text:span text:style-name="T2">(14/4) </text:span> ⲛ̣ ⲁ̣[ⲣ]ⲭⲏ· ⲉⲁⲩⲟⲩⲱⲛ[ϩ ⲉ]ⲃ̣ⲟⲗ ϩⲛ <text:line-break/><text:span text:style-name="T1"> </text:span><text:span text:style-name="T2">(14/5) </text:span> ⲟⲩⲁⲣⲭⲏ ⲛ ⲟⲩⲱⲧ’ ⲛⲧ[...] ⲡⲓⲉ‐ <text:line-break/><text:span text:style-name="T1"> </text:span><text:span text:style-name="T2">(14/6) </text:span> ⲱⲛ ⲛ ⲃ̅ⲁ̅ⲣ̅ⲃ̣̅̅ⲏ̣̅̅ⲗ̅ⲱ̅ ⲙ ⲡⲣⲏⲧⲉ ⲛ ϩⲉⲛ‐ <text:line-break/><text:span text:style-name="T1"> </text:span><text:span text:style-name="T2">(14/7) </text:span> ⲁⲣⲭⲏ ⲁⲛ ⲙⲛ ϩⲉⲛϭ̣ⲟⲙ ⲟⲩⲇⲉ ⲙ <text:line-break/><text:span text:style-name="T1"> </text:span><text:span text:style-name="T2">(14/8) </text:span> ⲡⲣⲏⲧⲉ ⲁⲛ ⲉⲃⲟⲗ ϩⲛ ⲟⲩⲁⲣⲭⲏ ⲙⲛ <text:line-break/><text:span text:style-name="T1"> </text:span><text:span text:style-name="T2">(14/9) </text:span> ⲟⲩϭⲟⲙ· ⲉⲁⲩⲟⲩⲱⲛϩ ⲉ[ⲃ]ⲟⲗ ⲛ ⲁⲣ‐ <text:line-break/><text:span text:style-name="T1"> </text:span><text:span text:style-name="T2">(14/10) </text:span> ⲭⲏ ⲛⲓⲙ ⲁⲩⲱ ⲁⲩ̣ϯ ϭⲟⲙ ⲛ̣ ϭⲟⲙ ⲛⲓⲙ <text:line-break/><text:span text:style-name="T1"> </text:span><text:span text:style-name="T2">(14/11) </text:span> ⲁⲩⲱ ⲉⲁⲩⲟⲩⲱⲛ̣[ϩ ⲉⲃⲟⲗ ϩ]ⲙ ⲡⲏ ⲉⲧ’‐ <text:line-break/><text:span text:style-name="T1"> </text:span><text:span text:style-name="T2">(14/12) </text:span> ⲥⲟⲧⲡ’ ⲉⲣⲟⲟⲩ ⲛϩ[ⲟⲩⲟ] ⲉⲧⲉ ⲛⲁⲓ̈ ⲛⲉ <text:line-break/><text:span text:style-name="T1"> </text:span><text:span text:style-name="T2">(14/13) </text:span> ϯϩⲩⲡⲁⲣⲝⲓⲥ ⲙⲛ [ϯⲙⲛ]ⲧ’ⲙⲁⲕ[ⲁⲣ]ⲓ̣ⲟⲥ <text:line-break/><text:span text:style-name="T1"> </text:span><text:span text:style-name="T2">(14/14) </text:span> ⲁⲩⲱ ⲡⲓⲱⲛϩ· ⲛⲓ̣[.....]ⲟⲩ[... <text:line-break/><text:span text:style-name="T1"> </text:span><text:span text:style-name="T2">(14/15) </text:span> ⲃⲟⲗ ⲙⲛ ⲛⲉⲩⲉ[ⲣⲏⲩ ....]ⲩⲱ̣[.. <text:line-break/><text:span text:style-name="T1"> </text:span><text:span text:style-name="T2">(14/16) </text:span> ⲉⲃⲟⲗ ϩⲛ ⲟⲩⲁ.[ <text:line-break/><text:span text:style-name="T1"> </text:span><text:span text:style-name="T2">(14/17) </text:span> ⲁⲩⲱ ⲉⲧⲃⲉ ⲡ[ <text:line-break/><text:span text:style-name="T1"> </text:span><text:span text:style-name="T2">(14/18) </text:span> ⲉⲁⲩϯ ⲣⲁⲛ ⲉ .[ <text:line-break/><text:span text:style-name="T1"> </text:span><text:span text:style-name="T2">(14/19) </text:span> ϩⲟⲩⲟ ⲛ ⲧⲁ[ <text:line-break/><text:span text:style-name="T1"> </text:span><text:span text:style-name="T2">(14/20) </text:span> ⲱⲧ’ ⲁⲩⲱ ϩⲉ[ <text:line-break/><text:span text:style-name="T1"> </text:span><text:span text:style-name="T2">(14/21) </text:span> ⲟⲩⲧⲉⲗⲓⲟⲥ [ <text:line-break/><text:span text:style-name="T1"> </text:span><text:span text:style-name="T2">(14/22) </text:span> ⲉⲃⲟⲗ ϩ̣[ⲛ ⲟ]ⲩⲁ[ <text:line-break/><text:span text:style-name="T1"> </text:span><text:span text:style-name="T2">(14/23) </text:span> ⲉⲟⲩ[...]..[ <text:line-break/><text:span text:style-name="T1"> </text:span><text:span text:style-name="T2">(14/24) </text:span> ⲟⲩⲁⲉ̣[ <text:line-break/><text:span text:style-name="T1"> </text:span><text:span text:style-name="T2">(14/25) </text:span> ⲧ.[ <text:line-break/><text:span text:style-name="T1"> </text:span><text:span text:style-name="T2">(14/26) </text:span> ⲉ[ <text:line-break/><text:soft-page-break/><text:span text:style-name="T1"> </text:span><text:span text:style-name="T2">(14/27) </text:span> ϭ[ <text:line-break/><text:span text:style-name="T1"> </text:span><text:span text:style-name="T2">(14/28) </text:span> ⲛ[ <text:line-break/><text:span text:style-name="T1"> </text:span><text:span text:style-name="T2">(15/1) </text:span> ⲁⲩⲱ̣ [.....] ⲛϭⲓ ⲟⲩⲙⲟⲟⲩ ⲛ̣ⲧⲉ <text:line-break/><text:span text:style-name="T1"> </text:span><text:span text:style-name="T2">(15/2) </text:span> ⲧⲟ̣ⲩ[ⲉⲓ ⲧⲟⲩ]ⲉⲓ ⲙⲙⲟⲟⲩ̣ ⲉⲧⲃⲉ ⲡⲁⲓ̈ <text:line-break/><text:span text:style-name="T1"> </text:span><text:span text:style-name="T2">(15/3) </text:span> ϩ̣[.....] ⲙ̣ⲙⲟⲟⲩ ⲛⲉ ⲛ ⲧⲉⲗⲓⲟ̣ⲥ ⲛ̣ⲉ· <text:line-break/><text:span text:style-name="T1"> </text:span><text:span text:style-name="T2">(15/4) </text:span> ⲡⲓⲙ[ⲟⲟ]ⲩ ⲛⲧⲉ ⲡⲱⲛϩ ⲉⲧⲉ ⲡⲁϯ‐ <text:line-break/><text:span text:style-name="T1"> </text:span><text:span text:style-name="T2">(15/5) </text:span> ⲙⲛⲧ’̣ⲱⲛ̣ϩ ⲡⲉ· ⲡⲏ ϯⲛⲟⲩ ⲉⲧⲁⲕ‐ <text:line-break/><text:span text:style-name="T1"> </text:span><text:span text:style-name="T2">(15/6) </text:span> ϫⲓ ϫⲱⲕⲙ ⲉⲣⲟϥ ϩⲙ ⲡⲓⲁⲩⲧⲟⲅⲉⲛⲏⲥ· <text:line-break/><text:span text:style-name="T1"> </text:span><text:span text:style-name="T2">(15/7) </text:span> ⲡ[ⲓⲙⲟⲟⲩ ⲇⲉ ⲛ]ⲧⲉ ϯⲙⲛⲧ’ⲙⲁⲕⲁⲣⲓ‐ <text:line-break/><text:span text:style-name="T1"> </text:span><text:span text:style-name="T2">(15/8) </text:span> ⲟⲥ ⲉⲧ̣[ⲉ ⲡⲁ]ⲡⲥⲟⲟⲩⲛ ⲡⲉ· ⲡⲏ ⲉⲧⲕ‐ <text:line-break/><text:span text:style-name="T1"> </text:span><text:span text:style-name="T2">(15/9) </text:span> ⲛⲁϫ[ⲓ ϫⲱ]ⲕⲙ ⲉⲣⲟϥ ϩⲙ ⲡⲓⲡⲣⲱⲧⲟ‐ <text:line-break/><text:span text:style-name="T1"> </text:span><text:span text:style-name="T2">(15/10) </text:span> ⲫⲁⲛ̣[ⲏⲥ·] ⲡ̣ⲓ̣ⲙ̣ⲟⲟⲩ ⲇⲉ ⲛⲧⲉ ϯϩⲩ‐ <text:line-break/><text:span text:style-name="T1"> </text:span><text:span text:style-name="T2">(15/11) </text:span> ⲡⲁⲣⲝ̣[ⲓⲥ ⲉⲧ]ⲉ ⲡ̣ⲁϯⲙⲛⲧ’ⲛⲟⲩⲧⲉ <text:line-break/><text:span text:style-name="T1"> </text:span><text:span text:style-name="T2">(15/12) </text:span> ⲡ̣ⲉ ⲉⲧ[ⲉ ⲡ]ⲁⲡⲓⲕⲁⲗⲩⲡⲧⲟⲥ ⲡⲉ· <text:line-break/><text:span text:style-name="T1"> </text:span><text:span text:style-name="T2">(15/13) </text:span> ⲁ̣ⲩⲱ̣ ϥ[ϣⲟⲟⲡ] ⲛ̣ϭⲓ ⲡⲓⲙⲟⲟⲩ ⲛⲧⲉ <text:line-break/><text:span text:style-name="T1"> </text:span><text:span text:style-name="T2">(15/14) </text:span> [ⲡⲓ]ⲱⲛ̣[ϩ...] ⲟ̣ⲩϭⲟⲙ· ⲡⲁϯⲙⲛⲧ’‐ <text:line-break/><text:span text:style-name="T1"> </text:span><text:span text:style-name="T2">(15/15) </text:span> [ⲙⲁ]ⲕⲁ̣[ⲣⲓⲟⲥ] ⲕ]ⲁⲧⲁ ⲟⲩⲥⲓⲁ· ⲡⲁ‐ <text:line-break/><text:span text:style-name="T1"> </text:span><text:span text:style-name="T2">(15/16) </text:span> [ϯⲙⲛⲧ’ⲛⲟⲩⲧⲉ] ⲇⲉ ⲕⲁⲧⲁ ⲟⲩϩⲩ‐ <text:line-break/><text:span text:style-name="T1"> </text:span><text:span text:style-name="T2">(15/17) </text:span> [ⲡⲁⲣⲝⲓⲥ ⲛⲁⲓ̈ ⲧ]ⲏⲣⲟⲩ ⲇⲉ ϩⲉⲛⲉⲓ‐ <text:line-break/><text:span text:style-name="T1"> </text:span><text:span text:style-name="T2">(15/18) </text:span> [ ⲙ]ⲛⲧ’ϭⲟⲙ ⲙⲛ ϩⲉ̅‐ <text:line-break/><text:span text:style-name="T1"> </text:span><text:span text:style-name="T2">(15/19) </text:span> [ ]ⲩ ⲛⲉⲧⲉ ϣⲁⲩ‐ <text:line-break/><text:span text:style-name="T1"> </text:span><text:span text:style-name="T2">(15/20) </text:span> [ ]ⲙⲟⲟⲩ ⲉⲧ’ⲧⲃ‐ <text:line-break/><text:span text:style-name="T1"> </text:span><text:span text:style-name="T2">(15/21) </text:span> [ⲃⲟ ]ⲩ.[..] ⲡⲉ ϩⲱ <text:line-break/><text:span text:style-name="T1"> </text:span><text:span text:style-name="T2">(15/22) </text:span> [ ]..[....] ⲕⲁⲧⲁ <text:line-break/><text:span text:style-name="T1"> </text:span><text:span text:style-name="T2">(15/23) </text:span> [ ⲉ]ⲧⲁⲩⲃⲱⲕ <text:line-break/><text:span text:style-name="T1"> </text:span><text:span text:style-name="T2">(15/24) </text:span> [ ]ⲩⲧ’· <text:line-break/><text:span text:style-name="T1"> </text:span><text:span text:style-name="T2">(15/25) </text:span> [ ] ⲙⲙⲁⲩ <text:line-break/><text:span text:style-name="T1"> </text:span><text:span text:style-name="T2">(15/26) </text:span> [ ]ⲱ <text:line-break/><text:span text:style-name="T1"> </text:span><text:span text:style-name="T2">(15/27) </text:span> [ ]ⲙⲏ <text:line-break/><text:span text:style-name="T1"> </text:span><text:span text:style-name="T2">(15/28) </text:span> [ ] <text:line-break/><text:span text:style-name="T1"> </text:span><text:span text:style-name="T2">(16/1) </text:span> ϩⲩⲡⲁⲣⲝⲓ̣[ⲥ] ⲙ ⲡⲣ[ⲏⲧⲉ ⲉⲧϥ]ϣⲟⲟⲡ’ <text:line-break/><text:span text:style-name="T1"> </text:span><text:span text:style-name="T2">(16/2) </text:span> ⲙⲙⲟⲥ· ⲟⲩⲙⲟⲛⲟ̣[ⲛ ⲁϥⲟⲩ]ⲱϩ̣ ϩ̣ⲛ <text:line-break/><text:span text:style-name="T1"> </text:span><text:span text:style-name="T2">(16/3) </text:span> ⲟⲩⲉⲛⲛⲟⲓⲁ· ⲁⲗⲗⲁ ⲁϥ.[.....]ⲛ ⲉ‐ <text:line-break/><text:span text:style-name="T1"> </text:span><text:span text:style-name="T2">(16/4) </text:span> ⲣⲟ̣ⲟⲩ ϫⲉ ⲛⲧⲟϥ ⲡⲉ ⲡϣ[ⲱ]ⲡⲉ ⲙ ⲡⲉ‐ <text:line-break/><text:span text:style-name="T1"> </text:span><text:span text:style-name="T2">(16/5) </text:span> ⲉⲓ̣ⲣⲏⲧⲉ· ⲉⲁϥⲕⲱ ⲛ ⲟⲩ[..].ϥ ϩⲓϫⲛ <text:line-break/><text:span text:style-name="T1"> </text:span><text:span text:style-name="T2">(16/6) </text:span> ⲡⲉⲧ’ϣⲟⲟⲡ’· ϩⲓⲛⲁ ϫⲉ ⲛⲛⲉϥϣⲱⲡⲉ <text:line-break/><text:span text:style-name="T1"> </text:span><text:span text:style-name="T2">(16/7) </text:span> ⲛⲛ ⲁⲧⲛ ⲁⲣⲏϫϥ ⲁⲩ[ⲱ] ⲛ̣ [ⲁ]ⲧ’ⲙⲟⲣⲫⲏ· <text:line-break/><text:span text:style-name="T1"> </text:span><text:span text:style-name="T2">(16/8) </text:span> ⲁⲗⲗⲁ ⲉⲁⲩϫⲓⲟⲟⲣ ⲙ[ⲙⲟϥ] ⲛⲁⲙⲉ <text:line-break/><text:span text:style-name="T1"> </text:span><text:span text:style-name="T2">(16/9) </text:span> ⲉⲩⲃⲣⲣⲉ ⲡⲉ ⲉ ⲡⲧⲣⲉ[ϥϣ]ⲱⲡⲉ <text:line-break/><text:span text:style-name="T1"> </text:span><text:span text:style-name="T2">(16/10) </text:span> ⲛⲛ ⲟⲩⲗⲁⲁⲩ· ⲉⲩⲛ[ⲧⲁ%1.] ⲙ̣ⲙⲁⲩ <text:line-break/><text:span text:style-name="T1"> </text:span><text:span text:style-name="T2">(16/11) </text:span> ⲙ ⲡⲉⲧⲉ ⲡⲱϥ ⲙ [.....] ⲡ̣ⲉ ⲑⲩ‐ <text:line-break/><text:span text:style-name="T1"> </text:span><text:span text:style-name="T2">(16/12) </text:span> ⲡⲁⲣⲝⲓⲥ ⲙⲛ ⲡⲓϣ[ⲏⲣ]ⲉ ⲉϥⲁϩⲉⲣⲁ‐ <text:line-break/><text:span text:style-name="T1"> </text:span><text:span text:style-name="T2">(16/13) </text:span> ⲧϥ ⲛⲙⲙⲁϥ ⲉϥϣ[ⲓ]ⲛ[ⲉ ⲛ]ⲙ̣ⲙ̣ⲁϥ [ⲉ]ϥ‐ <text:line-break/><text:span text:style-name="T1"> </text:span><text:span text:style-name="T2">(16/14) </text:span> ⲕⲱⲧⲉ ⲉⲣⲟϥ ⲁⲩ[.....]ⲛⲉ̣ ⲙ [.]. <text:line-break/><text:span text:style-name="T1"> </text:span><text:span text:style-name="T2">(16/15) </text:span> ⲛⲥⲁ ⲥⲁ ⲛⲓⲙ· ⲉ̣[.....]ⲱ[.. <text:line-break/><text:span text:style-name="T1"> </text:span><text:span text:style-name="T2">(16/16) </text:span> ⲉⲃⲟⲗ ϩⲙ ⲡⲓⲙⲉ̣[ <text:line-break/><text:span text:style-name="T1"> </text:span><text:span text:style-name="T2">(16/17) </text:span> ϫⲓ ⲙ ⲡⲏ ⲉⲧ’ⲧ.[ <text:line-break/><text:soft-page-break/><text:span text:style-name="T1"> </text:span><text:span text:style-name="T2">(16/18) </text:span> ⲛ ϣⲟⲟⲡ’ ⲛ ⲧ[ <text:line-break/><text:span text:style-name="T1"> </text:span><text:span text:style-name="T2">(16/19) </text:span> ⲟⲩⲉⲛⲉⲣⲅⲓⲁ̣ [ <text:line-break/><text:span text:style-name="T1"> </text:span><text:span text:style-name="T2">(16/20) </text:span> ⲟⲩⲟⲛϩ· ⲉⲩⲛ[ <text:line-break/><text:span text:style-name="T1"> </text:span><text:span text:style-name="T2">(16/21) </text:span> ⲡⲉϥⲕⲉϣⲁϫ[ⲉ <text:line-break/><text:span text:style-name="T1"> </text:span><text:span text:style-name="T2">(16/22) </text:span> ⲛⲉ ⲛⲁⲓ̈ ⲛ̣ⲥ̣ⲁ .[ <text:line-break/><text:span text:style-name="T1"> </text:span><text:span text:style-name="T2">(16/23) </text:span> ⲁⲩϣ̣[ⲱⲡ]ⲉ̣ ⲙ [ <text:line-break/><text:span text:style-name="T1"> </text:span><text:span text:style-name="T2">(16/24) </text:span> ⲣⲓ ⲛⲉⲩ̣[ <text:line-break/><text:span text:style-name="T1"> </text:span><text:span text:style-name="T2">(16/25) </text:span> ⲛ.[ <text:line-break/><text:span text:style-name="T1"> </text:span><text:span text:style-name="T2">(16/26) </text:span> ⲉ[ <text:line-break/><text:span text:style-name="T1"> </text:span><text:span text:style-name="T2">(16/27) </text:span> ⲡ[ <text:line-break/><text:span text:style-name="T1"> </text:span><text:span text:style-name="T2">(16/28) </text:span> .[ <text:line-break/><text:span text:style-name="T1"> </text:span><text:span text:style-name="T2">(16/29) </text:span> ϩ[ <text:line-break/><text:span text:style-name="T1"> </text:span><text:span text:style-name="T2">(17/1) </text:span> ⲁⲩⲱ ⲥϣⲟⲟⲡ’ ⲛϭⲓ ϯϭⲟⲙ ⲙⲛ ϯ‐ <text:line-break/><text:span text:style-name="T1"> </text:span><text:span text:style-name="T2">(17/2) </text:span> ⲟⲩⲥ[ⲓⲁ] ⲙⲛ ϯϩⲩⲡⲁⲣⲝⲓⲥ ⲛⲧⲉ <text:line-break/><text:span text:style-name="T1"> </text:span><text:span text:style-name="T2">(17/3) </text:span> ⲡϣⲱ[ⲡ]ⲉ ⲉϥϣⲟⲟⲡ’[ ⲛϭⲓ ⲡⲓ̣ⲙⲟ̣[ⲟ]ⲩ· <text:line-break/><text:span text:style-name="T1"> </text:span><text:span text:style-name="T2">(17/4) </text:span> ⲡⲣⲁⲛ [ⲇ]ⲉ ⲉⲧⲉⲩϫⲱⲕⲙ ⲉⲣⲟϥ ⲟⲩ‐ <text:line-break/><text:span text:style-name="T1"> </text:span><text:span text:style-name="T2">(17/5) </text:span> ϣⲁϫⲉ ⲡⲉ ⲛⲧⲉ ⲡⲓⲙⲟⲟⲩ· ⲡⲓϣⲟ‐ <text:line-break/><text:span text:style-name="T1"> </text:span><text:span text:style-name="T2">(17/6) </text:span> ⲣⲡ’ ⲟⲩⲛ ⲙ ⲙⲟⲟⲩ ⲛ ⲧⲉⲗⲓⲟⲥ ⲛⲧⲉ <text:line-break/><text:span text:style-name="T1"> </text:span><text:span text:style-name="T2">(17/7) </text:span> ⲡⲓϣ̣ⲙⲧ’̣[ϭⲟ]ⲙ̣ [ⲙ] ⲡⲓⲁⲩⲧⲟⲅⲉⲛⲏⲥ <text:line-break/><text:span text:style-name="T1"> </text:span><text:span text:style-name="T2">(17/8) </text:span> ⲟⲩⲱⲛϩ̣ [ⲡⲉ] ⲛⲧⲉ ⲛⲓⲯⲩⲭⲏ ⲛ ⲧⲉ‐ <text:line-break/><text:span text:style-name="T1"> </text:span><text:span text:style-name="T2">(17/9) </text:span> ⲗⲓⲟⲥ· ⲟ̣[ⲩ]ϣⲁϫⲉ ⲅⲁⲣ ⲡⲉ ⲛⲧⲉ <text:line-break/><text:span text:style-name="T1"> </text:span><text:span text:style-name="T2">(17/10) </text:span> ⲡⲓⲛⲟⲩ[ⲧⲉ ⲛ] ⲧⲉⲗⲓⲟⲥ ⲙ ⲡⲧⲣⲉϥϣⲱ‐ <text:line-break/><text:span text:style-name="T1"> </text:span><text:span text:style-name="T2">(17/11) </text:span> ⲡⲉ ⲁ.[.... ⲉ]ⲧⲙⲙⲁⲩ· ⲟⲩⲡⲏⲅⲏ <text:line-break/><text:span text:style-name="T1"> </text:span><text:span text:style-name="T2">(17/12) </text:span> ⲅⲁⲣ ⲛⲧⲉ [ⲛⲁ]ⲓ̈ ⲧⲏⲣⲟⲩ ⲡⲉ ⲡⲓⲁϩⲟⲣⲁ‐ <text:line-break/><text:span text:style-name="T1"> </text:span><text:span text:style-name="T2">(17/13) </text:span> ⲧⲟⲛ ⲙ ⲡ̣̅̅[̅ⲛ̅]̅ⲁ̣̅̅ ⲉⲧⲉ ⲛⲓⲕⲟⲟⲩⲉ ϩⲉⲛ‐ <text:line-break/><text:span text:style-name="T1"> </text:span><text:span text:style-name="T2">(17/14) </text:span> ⲉⲃ̣ⲟⲗ [ϩⲛ ϯⲅⲛ]ⲱⲥⲓⲥ ⲛⲉ ⲉϩⲉⲛⲉⲓⲛⲉ <text:line-break/><text:span text:style-name="T1"> </text:span><text:span text:style-name="T2">(17/15) </text:span> ⲛ̣ⲧⲁϥ [ⲛⲉ· ⲁⲗⲗ]ⲁ̣ ⲡⲏ ⲉⲧⲙⲙⲉ ⲉⲣⲟϥ <text:line-break/><text:span text:style-name="T1"> </text:span><text:span text:style-name="T2">(17/16) </text:span> ϫⲉ̣ [.].[.....] ⲁϣ ⲛ ⲣⲏⲧⲉ ⲏ%0 ⲁϣ <text:line-break/><text:span text:style-name="T1"> </text:span><text:span text:style-name="T2">(17/17) </text:span> [ ]ⲟⲛϩ ϩⲓ ⲟⲩⲥⲟⲡ’ <text:line-break/><text:span text:style-name="T1"> </text:span><text:span text:style-name="T2">(17/18) </text:span> [ ]ⲱ̣ⲛ̣ϩ ϩⲣⲁⲓ̈ ϩⲛ ⲟⲩ‐ <text:line-break/><text:span text:style-name="T1"> </text:span><text:span text:style-name="T2">(17/19) </text:span> [ ]ⲟⲩⲛ ⲡⲉ ⲡⲓⲙⲟ‐ <text:line-break/><text:span text:style-name="T1"> </text:span><text:span text:style-name="T2">(17/20) </text:span> [ ]ⲱⲛϩ· ϩⲙ ⲡϣⲱ‐ <text:line-break/><text:span text:style-name="T1"> </text:span><text:span text:style-name="T2">(17/21) </text:span> [ ϣ]ⲱⲡ̣ⲉ̣ ⲛ̣ⲛ ⲁⲧⲛ ⲁ‐ <text:line-break/><text:span text:style-name="T1"> </text:span><text:span text:style-name="T2">(17/22) </text:span> [ⲣⲏϫϥ ] ⲡⲉϥ[....]ⲉ ⲙⲙⲓⲛ <text:line-break/><text:span text:style-name="T1"> </text:span><text:span text:style-name="T2">(17/23) </text:span> [ⲙⲙⲟϥ ]ⲱ ⲡⲣⲁⲛ <text:line-break/><text:span text:style-name="T1"> </text:span><text:span text:style-name="T2">(17/24) </text:span> [ ]ⲩⲧⲉ <text:line-break/><text:span text:style-name="T1"> </text:span><text:span text:style-name="T2">(17/25) </text:span> [ ]ⲉ̣ⲉ <text:line-break/><text:span text:style-name="T1"> </text:span><text:span text:style-name="T2">(17/26) </text:span> [ ] ⲛ <text:line-break/><text:span text:style-name="T1"> </text:span><text:span text:style-name="T2">(17/27) </text:span> [ ]ϥ <text:line-break/><text:span text:style-name="T1"> </text:span><text:span text:style-name="T2">(18/1) </text:span> ⲉϥϣⲟⲟⲡ’ ⲟⲛⲧⲱⲥ· ⲡⲏ̣ ⲡⲉ ⲉϣⲁϥ‐ <text:line-break/><text:span text:style-name="T1"> </text:span><text:span text:style-name="T2">(18/2) </text:span> ϯ ⲧⲟϣ ⲉⲣⲟϥ· ⲁⲩⲱ ⲛⲏ ⲉ̣.[ⲛ]ⲛⲏⲩ <text:line-break/><text:span text:style-name="T1"> </text:span><text:span text:style-name="T2">(18/3) </text:span> ⲉϩⲣⲁⲓ̈ ⲉ ⲡⲓⲙⲟⲟⲩ ⲕⲁⲧⲁ ⲧ[ⲉⲓ̈]ϭⲟⲙ ⲛ <text:line-break/><text:span text:style-name="T1"> </text:span><text:span text:style-name="T2">(18/4) </text:span> ⲟ[ⲩ]ⲱ̣ⲧ’ ⲙⲛ ⲡⲓⲉⲓⲛⲉ ⲛⲧ[ⲉ] ϯⲧⲁⲝⲓⲥ· <text:line-break/><text:span text:style-name="T1"> </text:span><text:span text:style-name="T2">(18/5) </text:span> ⲁⲩⲱ ⲡⲓⲡⲣⲱⲧⲟⲫⲁⲛⲏ[ⲥ] ⲛ ⲛⲟϭ ⲛ <text:line-break/><text:span text:style-name="T1"> </text:span><text:span text:style-name="T2">(18/6) </text:span> ϩⲟⲟⲩⲧ’ ⲛⲛ ⲁⲧⲛⲁⲩ ⲉⲣⲟϥ ⲛ ⲧⲉⲗⲓⲟⲥ ⲛ <text:line-break/><text:span text:style-name="T1"> </text:span><text:span text:style-name="T2">(18/7) </text:span> ⲛⲟⲩⲥ· ⲟⲩⲛⲧⲁϥ ⲙ ⲡⲉϥⲙⲟⲟⲩ ⲙⲙⲓⲛ <text:line-break/><text:span text:style-name="T1"> </text:span><text:span text:style-name="T2">(18/8) </text:span> ⲙⲙⲟϥ· ϩⲱⲥ ⲉϣⲱ̣ⲡ̣[ⲉ ⲉ]ⲕϣⲁⲛⲉⲓ ⲉ‐ <text:line-break/><text:soft-page-break/><text:span text:style-name="T1"> </text:span><text:span text:style-name="T2">(18/9) </text:span> ϫⲛ ⲡⲉϥⲧⲟⲡⲟⲥ ⲉⲕ[ⲛⲁⲛⲁ]ⲩ̣ ⲉⲣⲟϥ ⲙ ⲡⲉⲓ̈‐ <text:line-break/><text:span text:style-name="T1"> </text:span><text:span text:style-name="T2">(18/10) </text:span> ⲣⲏⲧⲉ ⲟⲛ ⲡⲉ ⲡⲉⲓ̈ⲕ̅ⲗ̅ⲥ̅ [ⲛⲛ] ⲁⲧⲙⲓⲥⲉ· <text:line-break/><text:span text:style-name="T1"> </text:span><text:span text:style-name="T2">(18/11) </text:span> ⲕⲁⲧⲁ ⲡⲟⲩⲁ ⲡⲟⲩⲁ ⲇ[ⲉ ϥ]ϣⲟ̣ⲟⲡ’ ⲛϭⲓ <text:line-break/><text:span text:style-name="T1"> </text:span><text:span text:style-name="T2">(18/12) </text:span> ⲟⲩⲙⲉⲣⲓⲕⲟⲛ ⲙⲛ̣ [ⲟⲩϣⲟ]ⲣⲡ’ ⲛ ⲉⲓⲇⲟⲥ <text:line-break/><text:span text:style-name="T1"> </text:span><text:span text:style-name="T2">(18/13) </text:span> ϩⲓⲛⲁ ϫⲉ ⲉⲩⲉϫⲱⲕ ⲙ [ⲡ]ⲓ̣̈ⲣⲏⲧⲉ· ⲛⲓ‐ <text:line-break/><text:span text:style-name="T1"> </text:span><text:span text:style-name="T2">(18/14) </text:span> ⲁⲩⲧⲟⲅⲉⲛⲓⲟⲛ ⲅⲁⲣ [ⲛⲛ] ⲉⲱⲛ ϥⲧ̣ⲟ‐ <text:line-break/><text:span text:style-name="T1"> </text:span><text:span text:style-name="T2">(18/15) </text:span> ⲟⲩ ⲛⲉ ⲛ ⲧⲉⲗⲓⲟ[ⲥ ⲛⲓ]ⲕⲁⲧⲁ ⲟⲩ[ⲁ] ⲛ̣‐ <text:line-break/><text:span text:style-name="T1"> </text:span><text:span text:style-name="T2">(18/16) </text:span> ⲧⲉ ⲛⲓⲡⲁⲛⲧⲉⲗⲓⲟ̣ⲥ̣ [..ϣⲟ]ⲟⲡ’̣ [.. <text:line-break/><text:span text:style-name="T1"> </text:span><text:span text:style-name="T2">(18/17) </text:span> ⲛⲁⲓ̈ ⲛ ⲛⲓⲕⲁⲧⲁ ⲟ̣[ⲩⲁ ⲛ ⲧⲉ]ⲗ̣ⲓⲟⲥ· ⲡ[ⲓ]‐ <text:line-break/><text:span text:style-name="T1"> </text:span><text:span text:style-name="T2">(18/18) </text:span> ϯⲟⲩ ⲇⲉ ⲛⲛ ⲉⲱ[ⲛ......] ⲙ̣ⲙ[ <text:line-break/><text:span text:style-name="T1"> </text:span><text:span text:style-name="T2">(18/19) </text:span> ⲙ ⲡⲓⲁⲩⲧⲟⲅⲉⲛ[ⲏⲥ <text:line-break/><text:span text:style-name="T1"> </text:span><text:span text:style-name="T2">(18/20) </text:span> ⲧⲏⲣⲟⲩ ⲅⲁⲣ ϩⲉ̣ⲛ̣[ <text:line-break/><text:span text:style-name="T1"> </text:span><text:span text:style-name="T2">(18/21) </text:span> ϩⲟⲟⲩⲧ’ ⲛ ⲧ.[ <text:line-break/><text:span text:style-name="T1"> </text:span><text:span text:style-name="T2">(18/22) </text:span> ⲛⲓⲡⲧⲏⲣϥ ⲅⲁ[ⲣ ⲧⲉ]‐ <text:line-break/><text:span text:style-name="T1"> </text:span><text:span text:style-name="T2">(18/23) </text:span> ⲗⲓⲟⲥ ⲛ ⲛⲟⲩ[ⲧⲉ ⲡⲓϣⲟ]‐ <text:line-break/><text:span text:style-name="T1"> </text:span><text:span text:style-name="T2">(18/24) </text:span> ⲙⲧ’ ⲛ [ϩⲟⲟ]ⲩⲧ’̣ [ <text:line-break/><text:span text:style-name="T1"> </text:span><text:span text:style-name="T2">(18/25) </text:span> ⲕⲁⲧⲁ̣ [ⲟⲩ]ⲁ̣ ⲛ [ⲧⲉⲗⲓⲟⲥ <text:line-break/><text:span text:style-name="T1"> </text:span><text:span text:style-name="T2">(18/26) </text:span> ϩⲙ ⲡ[ <text:line-break/><text:span text:style-name="T1"> </text:span><text:span text:style-name="T2">(18/27) </text:span> ⲫ[ <text:line-break/><text:span text:style-name="T1"> </text:span><text:span text:style-name="T2">(18/28) </text:span> ⲉ[ <text:line-break/><text:span text:style-name="T1"> </text:span><text:span text:style-name="T2">(18/29) </text:span> .[ <text:line-break/><text:span text:style-name="T1"> </text:span><text:span text:style-name="T2">(18/30) </text:span> .[ <text:line-break/><text:span text:style-name="T1"> </text:span><text:span text:style-name="T2">(18/31) </text:span> .[ <text:line-break/><text:span text:style-name="T1"> </text:span><text:span text:style-name="T2">(19/1) </text:span> ⲧⲉⲗⲓⲟⲥ· ⲛⲏ ⲉⲧ’ϣⲟⲟⲡ’ ⲕⲁⲧ[ⲁ ⲟ]ⲩ‐ <text:line-break/><text:span text:style-name="T1"> </text:span><text:span text:style-name="T2">(19/2) </text:span> ⲉⲓ̣ⲇⲟⲥ̣ ⲙⲛ ⲟⲩⲅⲉⲛⲟⲥ· ⲁⲩ[ⲱ] ⲟⲩ‐ <text:line-break/><text:span text:style-name="T1"> </text:span><text:span text:style-name="T2">(19/3) </text:span> ⲧⲏⲣϥ̣ ⲙⲛ ⲟⲩⲇⲓⲁⲫⲟⲣⲁ [ⲙ ⲙ]ⲉⲣⲓ‐ <text:line-break/><text:span text:style-name="T1"> </text:span><text:span text:style-name="T2">(19/4) </text:span> ⲕⲟⲛ[·] ϯϩⲓⲏ ⲛ ⲃⲱⲕ ⲉϩⲣⲁⲓ̈ ⲉⲧ’ϫⲟⲥⲉ <text:line-break/><text:span text:style-name="T1"> </text:span><text:span text:style-name="T2">(19/5) </text:span> ⲉ ⲧⲉⲗⲓⲟⲥ ⲙⲛ ⲡⲓⲕⲗ̅ⲥ̅ ⲟⲛ ⲙ ⲡⲉⲓ̈ⲣⲏ‐ <text:line-break/><text:span text:style-name="T1"> </text:span><text:span text:style-name="T2">(19/6) </text:span> ⲧⲉ· ⲡⲓⲁⲩⲧⲟⲅⲉⲛⲏⲥ ⲇⲉ ⲛ ⲛⲟⲩⲧⲉ <text:line-break/><text:span text:style-name="T1"> </text:span><text:span text:style-name="T2">(19/7) </text:span> ⲟⲩϣⲟⲣⲡ’ ⲛ ⲁⲣⲭⲱⲛ ⲡⲉ ⲛⲧⲉ ⲛⲉ‐ <text:line-break/><text:span text:style-name="T1"> </text:span><text:span text:style-name="T2">(19/8) </text:span> ⲧⲉ ⲛⲟⲩϥ ⲛⲛ ⲉⲱⲛ ⲙⲛ ⲛⲓⲁⲅⲅⲉⲗⲟⲥ <text:line-break/><text:span text:style-name="T1"> </text:span><text:span text:style-name="T2">(19/9) </text:span> ⲙ ⲡⲣⲏⲧⲉ ⲛ ϩⲉⲛⲙⲉⲣⲟⲥ ⲛⲧⲁϥ· ⲛⲏ ⲅⲁⲣ <text:line-break/><text:span text:style-name="T1"> </text:span><text:span text:style-name="T2">(19/10) </text:span> ⲉⲧⲉ ⲡⲓϥⲧⲟⲟⲩ ϣⲟⲟⲡ’ ⲙⲙⲟϥ ⲕⲁ‐ <text:line-break/><text:span text:style-name="T1"> </text:span><text:span text:style-name="T2">(19/11) </text:span> ⲧⲁ ⲟⲩⲁ ⲥⲉⲛⲧⲉ ⲡⲉⲙⲉϩϯⲟⲩ ⲛⲛ ⲉ‐ <text:line-break/><text:span text:style-name="T1"> </text:span><text:span text:style-name="T2">(19/12) </text:span> ⲱⲛ ⲙⲙⲁ̣ⲩ ϩⲓ ⲟⲩⲥⲟⲡ’· ⲁⲩⲱ ϥϣⲟ‐ <text:line-break/><text:span text:style-name="T1"> </text:span><text:span text:style-name="T2">(19/13) </text:span> ⲟⲡ’ ⲛϭⲓ ⲡⲓⲙⲉϩϯⲟⲩ ϩⲛ ⲟⲩ̣ⲁ· ⲡⲓ‐ <text:line-break/><text:span text:style-name="T1"> </text:span><text:span text:style-name="T2">(19/14) </text:span> ϥⲧⲟⲟⲩ [ⲡⲉ ⲕ]ⲁⲧⲁ ⲙⲉⲣⲟⲥ ⲡⲓⲙⲉϩ‐ <text:line-break/><text:span text:style-name="T1"> </text:span><text:span text:style-name="T2">(19/15) </text:span> ϯⲟⲩ· ⲛ̣.[...] ⲟⲩⲇⲉ ⲥⲉϫⲏⲕ ⲉⲃⲟⲗ <text:line-break/><text:span text:style-name="T1"> </text:span><text:span text:style-name="T2">(19/16) </text:span> ⲕⲁⲧⲁ ⲟⲩⲁ̣ [ⲉⲩ]ⲛⲧⲁⲩ ⲙⲙⲁⲩ ⲛ ⲟⲩ‐ <text:line-break/><text:span text:style-name="T1"> </text:span><text:span text:style-name="T2">(19/17) </text:span> [....] ⲙ [.....]ⲧ̣ⲉ ⲟⲛ ϥϣⲟⲟⲡ’ ⲛ <text:line-break/><text:span text:style-name="T1"> </text:span><text:span text:style-name="T2">(19/18) </text:span> [........ϩⲟ]ⲟⲩⲧ’ ⲛ ⲕⲁⲧⲁ ⲟⲩⲁ <text:line-break/><text:span text:style-name="T1"> </text:span><text:span text:style-name="T2">(19/19) </text:span> [ ]ⲙ ⲅⲁⲣ ⲡⲉ ⲛⲧⲉ <text:line-break/><text:span text:style-name="T1"> </text:span><text:span text:style-name="T2">(19/20) </text:span> [ ] ⲛ ⲛⲟⲩⲧⲉ· ⲡⲓ‐ <text:line-break/><text:span text:style-name="T1"> </text:span><text:span text:style-name="T2">(19/21) </text:span> [ ] ⲇⲉ ⲛⲛ ⲁⲧⲛⲁⲩ <text:line-break/><text:span text:style-name="T1"> </text:span><text:span text:style-name="T2">(19/22) </text:span> [ⲉⲣⲟ%1 ] ⲛ ϩⲟ[ⲟⲩⲧ’] ⲛ ⲛⲟⲩⲥ <text:line-break/><text:span text:style-name="T1"> </text:span><text:span text:style-name="T2">(19/23) </text:span> [ ] ⲛ̣ ⲧⲉ̣[... ⲉ]ⲧ’ϣⲟⲟⲡ <text:line-break/><text:span text:style-name="T1"> </text:span><text:span text:style-name="T2">(19/24) </text:span> [ ].̅.̅[...].ⲛ· ⲟⲩ <text:line-break/><text:soft-page-break/><text:span text:style-name="T1"> </text:span><text:span text:style-name="T2">(19/25) </text:span> [ ]ⲩ <text:line-break/><text:span text:style-name="T1"> </text:span><text:span text:style-name="T2">(19/26) </text:span> [ ]ⲩ <text:line-break/><text:span text:style-name="T1"> </text:span><text:span text:style-name="T2">(19/27) </text:span> [ ]ⲉ <text:line-break/><text:span text:style-name="T1"> </text:span><text:span text:style-name="T2">(19/28) </text:span> [ <text:line-break/><text:span text:style-name="T1"> </text:span><text:span text:style-name="T2">(19/29) </text:span> [ ]ⲉ <text:line-break/><text:span text:style-name="T1"> </text:span><text:span text:style-name="T2">(20/1) </text:span> ⲛ ϩⲉⲛⲙⲉⲣⲟⲥ ⲉⲩⲟⲛϩ ⲁⲩⲱ ⲛ ⲧⲉⲗⲓⲟⲥ <text:line-break/><text:span text:style-name="T1"> </text:span><text:span text:style-name="T2">(20/2) </text:span> ⲡ̣[ⲓⲡ]ⲧⲏⲣ[ϥ] ⲇⲉ ⲁⲩⲱ ⲡⲓⲅⲉⲛ[ⲟ]ⲥ ⲙ ⲡⲁⲛ‐ <text:line-break/><text:span text:style-name="T1"> </text:span><text:span text:style-name="T2">(20/3) </text:span> ⲧ̣ⲉ̣ⲗ̣ⲓⲟⲥ ⲙⲛ ⲡⲏ ⲉⲧ’ϫⲟⲥⲉ̣ ⲉ ⲧⲉⲗⲓⲟⲥ <text:line-break/><text:span text:style-name="T1"> </text:span><text:span text:style-name="T2">(20/4) </text:span> ⲁⲩⲱ ⲙ ⲙⲁⲕⲁⲣⲓⲟⲥ· ⲡⲓⲕ̣ⲁ̣ⲗⲩⲡⲧⲟⲥ <text:line-break/><text:span text:style-name="T1"> </text:span><text:span text:style-name="T2">(20/5) </text:span> ⲇⲉ ⲛ ϫⲡⲟ ⲉⲃⲟⲗ ⲙⲙⲟϥ ⲙⲁⲩⲁⲁϥ· <text:line-break/><text:span text:style-name="T1"> </text:span><text:span text:style-name="T2">(20/6) </text:span> ⲉⲩⲁⲣⲭⲏ ⲡⲉ ⲉϥⲣ ϣⲣⲡ’ ⲛ ϣⲟⲟⲡ’ ⲛⲧⲉ <text:line-break/><text:span text:style-name="T1"> </text:span><text:span text:style-name="T2">(20/7) </text:span> ⲡⲓⲁⲩⲧⲟⲅⲉⲛⲏⲥ ⲉⲩⲛⲟⲩⲧⲉ ⲡⲉ ⲁⲩⲱ <text:line-break/><text:span text:style-name="T1"> </text:span><text:span text:style-name="T2">(20/8) </text:span> ⲛ ϣⲟⲣⲡ’ ⲛ ⲉⲓⲱⲧ’· ⲉⲩⲗⲟⲉⲓϭⲉ ⲡⲉ ⲛ‐ <text:line-break/><text:span text:style-name="T1"> </text:span><text:span text:style-name="T2">(20/9) </text:span> ⲧⲉ ⲡⲓⲡⲣⲱⲧⲟⲫⲁⲛⲏⲥ· ⲉⲩⲉⲓⲱⲧ’ <text:line-break/><text:span text:style-name="T1"> </text:span><text:span text:style-name="T2">(20/10) </text:span> ⲡⲉ ⲛⲧⲉ ⲛⲉⲧⲉ ⲛⲟⲩϥ ⲙ ⲙⲉⲣⲟⲥ· <text:line-break/><text:span text:style-name="T1"> </text:span><text:span text:style-name="T2">(20/11) </text:span> ⲉⲩⲛⲟⲩⲧⲉ ⲛ ⲉⲓⲱⲧ’ ⲡⲉ ⲉⲩⲣ ϣⲣⲡ’ <text:line-break/><text:span text:style-name="T1"> </text:span><text:span text:style-name="T2">(20/12) </text:span> ⲛ ⲉⲓⲙⲉ ⲉⲣⲟϥ· ⲁⲩⲱ ⲛⲉⲩⲉⲓⲙⲉ ⲉⲣⲟϥ <text:line-break/><text:span text:style-name="T1"> </text:span><text:span text:style-name="T2">(20/13) </text:span> ⲁⲛ· ⲟⲩϭⲟⲙ ⲅⲁⲣ ⲉⲃⲟⲗ ⲙⲙⲟϥ ⲡⲉ ⲙⲛ <text:line-break/><text:span text:style-name="T1"> </text:span><text:span text:style-name="T2">(20/14) </text:span> ⲟⲩⲉ̣[ⲓ]ⲱⲧ’ ⲉⲃⲟⲗ ⲙ[ⲙⲟ]ϥ ⲙⲁⲩⲁⲁϥ· <text:line-break/><text:span text:style-name="T1"> </text:span><text:span text:style-name="T2">(20/15) </text:span> ⲉⲧⲃⲉ ⲡⲁⲓ̈ ⲟⲩⲁⲧ’ⲉ̣[ⲓⲱ]ⲧ’̣ ⲡⲉ· ⲡⲓⲁⲧ’̣‐ <text:line-break/><text:span text:style-name="T1"> </text:span><text:span text:style-name="T2">(20/16) </text:span> ⲛⲁⲩ ⲇⲉ ⲉⲣⲟϥ ⲛ̣ [ϣ]ⲙⲧ’ϭⲟⲙ· ϯϣⲟ̣‐ <text:line-break/><text:span text:style-name="T1"> </text:span><text:span text:style-name="T2">(20/17) </text:span> ⲣⲡ’ ⲛ ⲉⲛⲛⲟⲓⲁ ⲛ[ⲧⲉ ⲛⲁⲓ̈] ⲧⲏⲣⲟ[ⲩ] ⲡⲓ[ⲁϩⲟ]‐ <text:line-break/><text:span text:style-name="T1"> </text:span><text:span text:style-name="T2">(20/18) </text:span> ⲣⲁⲧⲟⲛ ⲙ ⲡⲛ̅ⲁ̅· ⲟ̣[....]ⲏ ⲛ̣ [... <text:line-break/><text:span text:style-name="T1"> </text:span><text:span text:style-name="T2">(20/19) </text:span> ⲣⲟⲩ ⲡⲉ· ⲁⲩⲱ [ <text:line-break/><text:span text:style-name="T1"> </text:span><text:span text:style-name="T2">(20/20) </text:span> ⲟⲩⲥⲓⲁ ⲉⲥϩⲁ[ <text:line-break/><text:span text:style-name="T1"> </text:span><text:span text:style-name="T2">(20/21) </text:span> ⲙⲛ ⲟⲩϩⲩⲡⲣ[ⲝⲓⲥ <text:line-break/><text:span text:style-name="T1"> </text:span><text:span text:style-name="T2">(20/22) </text:span> ⲟⲩⲛ ϩⲉⲛϩⲩ[ⲡⲁⲣⲝⲓⲥ <text:line-break/><text:span text:style-name="T1"> </text:span><text:span text:style-name="T2">(20/23) </text:span> ⲟⲩⲱⲛ[ϩ .]ⲧⲗ[ <text:line-break/><text:span text:style-name="T1"> </text:span><text:span text:style-name="T2">(20/24) </text:span> ⲙⲁⲕⲁ̣[ⲣⲓⲟ]ⲥ· ⲁ[ <text:line-break/><text:span text:style-name="T1"> </text:span><text:span text:style-name="T2">(20/25) </text:span> ⲛ ϯⲙⲛ[ⲧ’.]ⲟ[ <text:line-break/><text:span text:style-name="T1"> </text:span><text:span text:style-name="T2">(20/26) </text:span> ⲛⲁⲓ̈ ⲧ[ⲏⲣⲟⲩ <text:line-break/><text:span text:style-name="T1"> </text:span><text:span text:style-name="T2">(20/27) </text:span> ⲡⲓ[ <text:line-break/><text:span text:style-name="T1"> </text:span><text:span text:style-name="T2">(20/28) </text:span> ⲛ [ <text:line-break/><text:span text:style-name="T1"> </text:span><text:span text:style-name="T2">(20/29) </text:span> ⲛ [ <text:line-break/><text:span text:style-name="T1"> </text:span><text:span text:style-name="T2">(20/30) </text:span> ⲧⲉ̣[ <text:line-break/><text:span text:style-name="T1"> </text:span><text:span text:style-name="T2">(21/1) </text:span> ⲟⲡ’ ⲛϩⲣⲁⲓ̈ ⲛϩⲏⲧⲟⲩ· ⲁ[......] <text:line-break/><text:span text:style-name="T1"> </text:span><text:span text:style-name="T2">(21/2) </text:span> ϩⲛ ϩⲉ[ⲛ]ⲕⲟⲟⲩⲉ ⲛⲧⲟⲟⲩ ⲧ[.... <text:line-break/><text:span text:style-name="T1"> </text:span><text:span text:style-name="T2">(21/3) </text:span> ⲉⲃⲟⲗ ϩⲓⲧⲟⲟⲧⲟⲩ ⲧⲏⲣⲟⲩ ⲛ[ϩⲣ]ⲁ̣ⲓ̈ <text:line-break/><text:span text:style-name="T1"> </text:span><text:span text:style-name="T2">(21/4) </text:span> ϩⲛ ⲟⲩⲙⲏⲏϣⲉ ⲙ ⲙⲁ· ⲡⲓⲙⲁ ⲉⲧⲁϥ‐ <text:line-break/><text:span text:style-name="T1"> </text:span><text:span text:style-name="T2">(21/5) </text:span> ⲟⲩⲁϣϥ ⲁⲩⲱ ⲡⲓⲙⲁ ⲉⲧⲉ ϩⲛⲁϥ <text:line-break/><text:span text:style-name="T1"> </text:span><text:span text:style-name="T2">(21/6) </text:span> ⲉⲩⲛϩⲣⲁⲓ̈ ϩⲙ ⲙⲁ ⲛⲓⲙ· ⲁⲩⲱ ⲉⲛ‐ <text:line-break/><text:span text:style-name="T1"> </text:span><text:span text:style-name="T2">(21/7) </text:span> ⲥⲉ ⲛϩⲣⲁⲓ̈ ϩⲛ ⲗⲁⲁⲩ ⲙ ⲙⲁ ⲁⲛ· ⲁⲩⲱ <text:line-break/><text:span text:style-name="T1"> </text:span><text:span text:style-name="T2">(21/8) </text:span> ⲉⲩⲣ ⲭⲱⲣⲓ 〈 〉 ⲛⲉⲩⲡⲛ̅ⲁ̅· ϩⲉⲛⲁⲧⲥⲱ‐ <text:line-break/><text:span text:style-name="T1"> </text:span><text:span text:style-name="T2">(21/9) </text:span> ⲙⲁ ⲅⲁⲣ ⲛⲉ ⲁⲩⲱ ⲥⲉⲥⲟⲧⲡ’ ⲉ ϩⲉⲛ‐ <text:line-break/><text:span text:style-name="T1"> </text:span><text:span text:style-name="T2">(21/10) </text:span> ⲁⲧⲥⲱⲙⲁ· ϩⲉⲛⲁⲧⲡⲱϣⲉ ⲛⲉ ⲙⲛ <text:line-break/><text:span text:style-name="T1"> </text:span><text:span text:style-name="T2">(21/11) </text:span> ϩⲉⲛⲙⲉⲉⲩⲉ ⲉⲩⲟⲛϩ· ⲁⲩⲱ ⲟⲩϭⲟⲙ <text:line-break/><text:span text:style-name="T1"> </text:span><text:span text:style-name="T2">(21/12) </text:span> ⲛⲧⲉ ⲧⲙⲉ ⲙⲛ ⲛⲏ ⲉⲧ’ⲧⲟⲩⲃⲏⲟⲩⲧ’ <text:line-break/><text:soft-page-break/><text:span text:style-name="T1"> </text:span><text:span text:style-name="T2">(21/13) </text:span> ⲛⲧⲉ ⲛⲁⲓ̈ ⲛ[ϩⲟ]ⲩⲟ· ⲉⲩϣⲟⲟⲡ’ ⲡⲣⲟⲥ <text:line-break/><text:span text:style-name="T1"> </text:span><text:span text:style-name="T2">(21/14) </text:span> ⲡⲁⲓ̈ ⲛϩⲟ[ⲩⲟ] ⲉ̣ⲩⲧⲟⲩⲃⲏⲟⲩⲧ’· ⲁⲩⲱ <text:line-break/><text:span text:style-name="T1"> </text:span><text:span text:style-name="T2">(21/15) </text:span> ⲙ ⲡⲣⲏⲧⲉ ⲛ [ⲛⲓⲥ]ⲱⲙⲁ ⲁⲛ ⲉⲧ’ϣⲟ‐ <text:line-break/><text:span text:style-name="T1"> </text:span><text:span text:style-name="T2">(21/16) </text:span> ⲟⲡ’ ϩⲛ ⲟⲩ[ⲧⲟ]ⲡ̣ⲟⲥ ⲛ ⲟⲩⲱⲧ’· <text:line-break/><text:span text:style-name="T1"> </text:span><text:span text:style-name="T2">(21/17) </text:span> ⲡⲁⲛⲧⲱ̣[ⲥ ⲟⲩ]ⲛⲧⲁⲩ ⲙⲙⲁⲩ ⲛ <text:line-break/><text:span text:style-name="T1"> </text:span><text:span text:style-name="T2">(21/18) </text:span> [ⲟ]ⲩⲁⲛⲁ̣ⲅ̣ⲕⲏ ⲏ%0 [ⲕ]ⲁ̣ⲧⲁ ⲡⲧⲏⲣϥ· ⲏ%0 ⲕⲁ‐ <text:line-break/><text:span text:style-name="T1"> </text:span><text:span text:style-name="T2">(21/19) </text:span> [ⲧ]ⲁ̣ ⲟⲩⲙⲉⲣ̣ⲟ̣ⲥ̣[· ϯ]ϩⲓⲏ ⲟⲩⲛ ⲛ ⲃⲱⲕ <text:line-break/><text:span text:style-name="T1"> </text:span><text:span text:style-name="T2">(21/20) </text:span> [ⲉ]ϩ̣ⲣⲁⲓ̈ ⲉ̣.[..]..[..] ⲟⲩⲧⲃⲃⲟ ⲡⲉ <text:line-break/><text:span text:style-name="T1"> </text:span><text:span text:style-name="T2">(21/21) </text:span> [..]ⲧ̣[........] ⲧ̣ⲟⲩⲉⲓ ⲧⲟⲩⲉⲓ <text:line-break/><text:span text:style-name="T1"> </text:span><text:span text:style-name="T2">(21/22) </text:span> [ ]ⲥ ⲕϣ[...] ⲉϩⲣⲁⲓ̈ <text:line-break/><text:span text:style-name="T1"> </text:span><text:span text:style-name="T2">(21/23) </text:span> [ ⲙ]ⲙⲓⲛ̣ [ⲙ]ⲙ̣ⲟⲥ ⲁⲩⲱ <text:line-break/><text:span text:style-name="T1"> </text:span><text:span text:style-name="T2">(21/24) </text:span> [ ]ⲟ̣[....] ⲙ̣ⲙⲟⲟⲩ· <text:line-break/><text:span text:style-name="T1"> </text:span><text:span text:style-name="T2">(21/25) </text:span> [ ]ϣⲟ <text:line-break/><text:span text:style-name="T1"> </text:span><text:span text:style-name="T2">(21/26) </text:span> [ⲟ...]ⲧⲉ <text:line-break/><text:span text:style-name="T1"> </text:span><text:span text:style-name="T2">(21/27) </text:span> [ ]ⲱ <text:line-break/><text:span text:style-name="T1"> </text:span><text:span text:style-name="T2">(21/28) </text:span> [ ⲡⲁⲛ]ⲧ̣ⲱⲥ <text:line-break/><text:span text:style-name="T1"> </text:span><text:span text:style-name="T2">(21/29) </text:span> [ ]ⲟⲩϥ <text:line-break/><text:span text:style-name="T1"> </text:span><text:span text:style-name="T2">(22/1) </text:span> ⲙ ⲙ[ⲉ]ⲣ̣ⲓⲕⲟⲛ ⲛⲛ ⲉⲱⲛ· ⲁⲩⲱ <text:line-break/><text:span text:style-name="T1"> </text:span><text:span text:style-name="T2">(22/2) </text:span> [ⲁϥϣⲁ]ϫ̣ⲉ ϫⲉ ⲡⲱⲥ ⲟⲩⲛ ϣϭⲟⲙ <text:line-break/><text:span text:style-name="T1"> </text:span><text:span text:style-name="T2">(22/3) </text:span> [ⲙ]ⲙ̣ⲟϥ ⲛ ϣⲱⲡ’ ⲉⲣⲟϥ ⲛ ⲟⲩⲧⲩ‐ <text:line-break/><text:span text:style-name="T1"> </text:span><text:span text:style-name="T2">(22/4) </text:span> ⲡ̣ⲟ̣ⲥ ⲛ ϣⲁ ⲉⲛⲉϩ· ⲁⲩⲱ ϣⲁϥⲕⲟⲓ‐ <text:line-break/><text:span text:style-name="T1"> </text:span><text:span text:style-name="T2">(22/5) </text:span> ⲛⲱⲛⲓ ⲛϭⲓ ⲡⲛⲟⲉⲣⲟⲥ ⲛ ⲕⲁⲑⲟⲗⲓ‐ <text:line-break/><text:span text:style-name="T1"> </text:span><text:span text:style-name="T2">(22/6) </text:span> ⲕⲟⲛ· ⲉϣⲁϥϫⲱⲕ ⲉⲃⲟⲗ ⲛϭⲓ ⲡⲓ‐ <text:line-break/><text:span text:style-name="T1"> </text:span><text:span text:style-name="T2">(22/7) </text:span> ⲙⲟⲟⲩ ⲛ ⲁⲩⲧⲟⲅⲉⲛⲏⲥ· ⲉϣⲱ‐ <text:line-break/><text:span text:style-name="T1"> </text:span><text:span text:style-name="T2">(22/8) </text:span> ⲡⲉ ⲇⲉ ⲉϥϣⲁⲛⲉⲓⲙⲉ ⲉⲣⲟϥ ⲙⲛ <text:line-break/><text:span text:style-name="T1"> </text:span><text:span text:style-name="T2">(22/9) </text:span> ⲛⲁⲓ̈ ⲧⲏⲣⲟⲩ· ⲡⲓⲙⲟⲟⲩ ⲙ ⲡⲣⲱ‐ <text:line-break/><text:span text:style-name="T1"> </text:span><text:span text:style-name="T2">(22/10) </text:span> ⲧⲟⲫⲁⲛⲏⲥ ⲡⲉ· ⲉϣⲱⲡⲉ ⲇⲉ <text:line-break/><text:span text:style-name="T1"> </text:span><text:span text:style-name="T2">(22/11) </text:span> ⲉϥϣⲁⲛϩⲱⲧⲡ’ ⲛⲙⲙⲁϥ ⲙⲛ ⲛⲁⲓ̈ <text:line-break/><text:span text:style-name="T1"> </text:span><text:span text:style-name="T2">(22/12) </text:span> ⲧⲏⲣⲟⲩ· ⲡⲁⲡⲓⲕⲁⲗⲩⲡ〈ⲧ〉ⲟⲥ ⲡⲉ· <text:line-break/><text:span text:style-name="T1"> </text:span><text:span text:style-name="T2">(22/13) </text:span> ⲡⲉⲓ̈ⲉⲓⲛⲉ ⲟⲛ ⲉⲧ’ϣⲟⲟⲡ’ ϩⲛ ⲛⲓ‐ <text:line-break/><text:span text:style-name="T1"> </text:span><text:span text:style-name="T2">(22/14) </text:span> ⲉⲱⲛ· ⲉⲉⲓⲙⲉ ⲉ̣ [ⲛⲁ]ⲓ̈ ⲕⲁⲧⲁ ⲟⲩⲁ <text:line-break/><text:span text:style-name="T1"> </text:span><text:span text:style-name="T2">(22/15) </text:span> ⲙⲛ ⲛⲓⲙⲉⲣⲟⲥ̣ ⲛ̣ [....]ⲟⲥ ⲛⲉ· ⲛⲏ <text:line-break/><text:span text:style-name="T1"> </text:span><text:span text:style-name="T2">(22/16) </text:span> ⲛⲧⲉ ⲡⲧⲏⲣϥ [ⲙ ⲡ]ⲙⲁ ⲉⲧⲉ ⲡⲥⲟ‐ <text:line-break/><text:span text:style-name="T1"> </text:span><text:span text:style-name="T2">(22/17) </text:span> ⲟⲩⲛ ⲙⲙⲁⲩ [ⲁⲩⲱ] ⲡ̣ⲏ ⲉⲧⲟⲩⲉⲓ̣‐ <text:line-break/><text:span text:style-name="T1"> </text:span><text:span text:style-name="T2">(22/18) </text:span> ⲙⲉ ⲉⲣⲟϥ ⲁⲩⲡ̣[ⲱ]ⲣϫ̣ [ⲉ]ⲃ̣ⲟⲗ· ⲁ[ⲩⲱ] <text:line-break/><text:span text:style-name="T1"> </text:span><text:span text:style-name="T2">(22/19) </text:span> ⲟⲩⲙⲛⲧ’ϣ[ⲃⲏⲣ] ⲉⲧⲛⲧⲁⲩ [ⲛϩⲣⲁⲓ̈] <text:line-break/><text:span text:style-name="T1"> </text:span><text:span text:style-name="T2">(22/20) </text:span> ϩⲛ ⲛⲉⲩⲉⲣⲏ[ⲩ]· ⲡ[ⲧ]ⲏⲣϥ ⲁⲩ[ⲱ ⲛⲁⲓ̈] <text:line-break/><text:span text:style-name="T1"> </text:span><text:span text:style-name="T2">(22/21) </text:span> ⲧⲏⲣⲟⲩ ⲉⲩ.[.......].[.]ⲟ̣ⲩ[... <text:line-break/><text:span text:style-name="T1"> </text:span><text:span text:style-name="T2">(22/22) </text:span> ϫⲱⲕⲙ̣ ⲉ̣ ⲡⲓ[ⲭⲱⲕⲙ ⲛ ⲁⲩⲧⲟⲅⲉ]‐ <text:line-break/><text:span text:style-name="T1"> </text:span><text:span text:style-name="T2">(22/23) </text:span> ⲛⲏⲥ [..] ϣⲁϥ[ <text:line-break/><text:span text:style-name="T1"> </text:span><text:span text:style-name="T2">(22/24) </text:span> ⲛ ⲧⲉ[..]..[ <text:line-break/><text:span text:style-name="T1"> </text:span><text:span text:style-name="T2">(22/25) </text:span> ⲙ[ <text:line-break/><text:span text:style-name="T1"> </text:span><text:span text:style-name="T2">(22/26) </text:span> ⲙ[ <text:line-break/><text:span text:style-name="T1"> </text:span><text:span text:style-name="T2">(22/27) </text:span> .[ <text:line-break/><text:span text:style-name="T1"> </text:span><text:span text:style-name="T2">(22/28) </text:span> .[ <text:line-break/><text:span text:style-name="T1"> </text:span><text:span text:style-name="T2">(22/29) </text:span> .[ <text:line-break/><text:span text:style-name="T1"> </text:span><text:span text:style-name="T2">(23/1) </text:span> ⲙⲙⲁⲩ ⲉϥⲟⲩⲱⲛϩ ⲙⲙⲟ̣[ϥ ⲉⲃ]ⲟⲗ <text:line-break/><text:soft-page-break/><text:span text:style-name="T1"> </text:span><text:span text:style-name="T2">(23/2) </text:span> ⲉⲧⲉ ⲡⲁⲓ̈ ⲡⲉ ⲉⲧⲁϥⲉⲓⲙⲉ̣ [ϫⲉ ⲡ]ⲱⲥ <text:line-break/><text:span text:style-name="T1"> </text:span><text:span text:style-name="T2">(23/3) </text:span> ϥϣⲟⲟⲡ’ ⲛⲁϥ· ⲁⲩⲱ ⲟⲩⲛ̣[ⲧⲁ]ϥ ⲛ̅‐ <text:line-break/><text:span text:style-name="T1"> </text:span><text:span text:style-name="T2">(23/4) </text:span> ⲛ ⲟⲩⲙⲛⲧ’ϣⲃⲏⲣ ϩⲁ ⲛⲉⲩⲉⲣⲏⲟⲩ <text:line-break/><text:span text:style-name="T1"> </text:span><text:span text:style-name="T2">(23/5) </text:span> ⲁϥϫⲱⲕⲙ ⲉ ⲡⲓϫⲱⲕⲙ ⲙ ⲡⲣⲱⲧⲟ‐ <text:line-break/><text:span text:style-name="T1"> </text:span><text:span text:style-name="T2">(23/6) </text:span> ⲫⲁⲛⲏⲥ· ϯⲁⲣⲭⲏ ⲇⲉ ⲛⲧⲉ ⲛⲁⲓ̈ ⲉ‐ <text:line-break/><text:span text:style-name="T1"> </text:span><text:span text:style-name="T2">(23/7) </text:span> ϣⲱⲡⲉ ⲉϣⲁϥⲉⲓⲙⲉ ⲉⲣⲟⲥ ϫⲉ <text:line-break/><text:span text:style-name="T1"> </text:span><text:span text:style-name="T2">(23/8) </text:span> ⲡⲱⲥ ⲥⲉⲟⲩⲟⲛϩ ⲉⲃⲟⲗ ⲧⲏⲣⲟⲩ ϩⲛ <text:line-break/><text:span text:style-name="T1"> </text:span><text:span text:style-name="T2">(23/9) </text:span> ⲟⲩⲁⲡⲉ ⲛ ⲟⲩⲱⲧ’· ⲁⲩⲱ ⲡⲱⲥ <text:line-break/><text:span text:style-name="T1"> </text:span><text:span text:style-name="T2">(23/10) </text:span> ⲉⲩϩⲟⲧⲡ’ ⲛϭⲓ ⲛⲁⲓ̈ ⲧⲏⲣⲟⲩ ϣⲁⲩ‐ <text:line-break/><text:span text:style-name="T1"> </text:span><text:span text:style-name="T2">(23/11) </text:span> ⲡⲱⲣϫ ⲉⲃⲟⲗ· ⲁⲩⲱ ⲡⲱⲥ ϣⲁⲩ‐ <text:line-break/><text:span text:style-name="T1"> </text:span><text:span text:style-name="T2">(23/12) </text:span> ϩⲱⲧⲡ’ ⲟⲛ ⲛϭⲓ ⲛⲏ ⲉⲧⲁⲩⲡⲱⲣϫ <text:line-break/><text:span text:style-name="T1"> </text:span><text:span text:style-name="T2">(23/13) </text:span> ⲉⲃⲟⲗ· ⲁⲩⲱ̣ ⲡⲱⲥ ϣⲁⲣⲉⲛⲓⲙⲉ‐ <text:line-break/><text:span text:style-name="T1"> </text:span><text:span text:style-name="T2">(23/14) </text:span> ⲣⲟⲥ ϩⲱ[ⲧⲡ’ ⲙ]ⲛ̣ ⲛⲓⲧⲏⲣϥ ⲁⲩⲱ ⲛⲓ‐ <text:line-break/><text:span text:style-name="T1"> </text:span><text:span text:style-name="T2">(23/15) </text:span> ⲉⲓⲇⲟⲥ ⲙⲛ ⲛ̣[ⲓⲅⲉ]ⲛⲟⲥ· ⲉϣⲱⲡⲉ <text:line-break/><text:span text:style-name="T1"> </text:span><text:span text:style-name="T2">(23/16) </text:span> ⲉⲣϣⲁⲟⲩ[ⲁ ⲉⲓ]ⲙ̣ⲉ ⲉ ⲛⲁⲓ̈ ⲁϥϫⲱⲕⲙ <text:line-break/><text:span text:style-name="T1"> </text:span><text:span text:style-name="T2">(23/17) </text:span> ⲉ ⲡⲓϫⲱ[ⲕⲙ ⲛ] ⲕ̅ⲗ̅ⲥ̅· ⲁⲩⲱ ⲕⲁⲧⲁ <text:line-break/><text:span text:style-name="T1"> </text:span><text:span text:style-name="T2">(23/18) </text:span> ⲡⲟⲩⲁ ⲡⲟⲩⲁ [ⲛ ⲛⲓ]ⲧⲟⲡⲟⲥ· ⲟⲩⲛ‐ <text:line-break/><text:span text:style-name="T1"> </text:span><text:span text:style-name="T2">(23/19) </text:span> ⲧⲁϥ ⲙⲙⲁⲩ ⲛ ⲟ[ⲩ]ⲙⲉⲣⲓⲕⲟⲛ ⲛⲧⲉ <text:line-break/><text:span text:style-name="T1"> </text:span><text:span text:style-name="T2">(23/20) </text:span> ⲛⲓϣ̣ⲁ̣ ⲉⲛ̣ⲉ̣[ϩ ⲁⲩ]ⲱ ϣⲁϥⲃⲱⲕ <text:line-break/><text:span text:style-name="T1"> </text:span><text:span text:style-name="T2">(23/21) </text:span> ⲉϩ[ⲣⲁⲓ̈...ⲙ] ⲡⲣⲏ̣[ⲧⲉ] ⲉϣⲁϥ‐ <text:line-break/><text:span text:style-name="T1"> </text:span><text:span text:style-name="T2">(23/22) </text:span> [......ⲧⲟⲩ]ⲃⲏⲟ[ⲩ ⲛ ϩ]ⲁⲡⲗⲟⲩⲛ <text:line-break/><text:span text:style-name="T1"> </text:span><text:span text:style-name="T2">(23/23) </text:span> ⲛ ⲟⲩⲟ̣ⲉⲓϣ ⲛ̣[ⲓⲙ] ⲉϥ[..].ⲩ ⲉϩⲣⲁⲓ̈ <text:line-break/><text:span text:style-name="T1"> </text:span><text:span text:style-name="T2">(23/24) </text:span> ⲉ ⲟⲩⲁ ⲙ̅ ⲡ[ ]ϣ <text:line-break/><text:span text:style-name="T1"> </text:span><text:span text:style-name="T2">(23/25) </text:span> ⲛⲓⲙ ⲉϥⲧⲟⲩⲃ̣[ⲏⲟⲩⲧ’ ⲛ ϩⲁⲡ]ⲗⲟⲩ‐· <text:line-break/><text:span text:style-name="T1"> </text:span><text:span text:style-name="T2">(23/26) </text:span> ϣⲁϥⲙⲟⲩϩ ⲉⲃⲟ[ⲗ.......]ⲙⲉ <text:line-break/><text:span text:style-name="T1"> </text:span><text:span text:style-name="T2">(23/27) </text:span> ϩⲛ ⲟⲩϩⲩⲡⲁⲣⲝⲓⲥ ⲙ [.....]ⲁ̣ <text:line-break/><text:span text:style-name="T1"> </text:span><text:span text:style-name="T2">(23/28) </text:span> ⲁⲩⲱ ⲟⲩⲡ̅ⲛ̅ⲁ̅ ⲉϥⲟⲩ[ⲁⲁⲃ] ⲙ̣ⲛ <text:line-break/><text:span text:style-name="T1"> </text:span><text:span text:style-name="T2">(24/1) </text:span> ⲗⲁⲁⲩ̣ ⲛⲧⲁϥ ⲛⲥⲁⲃⲟⲗ ⲙⲙⲟϥ· ϣⲁϥ‐ <text:line-break/><text:span text:style-name="T1"> </text:span><text:span text:style-name="T2">(24/2) </text:span> ⲛ[ⲁⲩ ⲙ]ⲉⲛ ϩⲛ ⲟⲩⲯⲩⲭⲏ ⲇⲉ ⲛ ⲧⲉⲗⲓ‐ <text:line-break/><text:span text:style-name="T1"> </text:span><text:span text:style-name="T2">(24/3) </text:span> ⲟ̣[ⲥ ⲉ ⲛ]ⲁⲛⲓⲁⲩⲧⲟⲅⲉⲛⲏⲥ· ϩⲛ ⲟⲩⲛⲟⲩⲥ <text:line-break/><text:span text:style-name="T1"> </text:span><text:span text:style-name="T2">(24/4) </text:span> ⲇ[ⲉ ⲉ] ⲛⲁⲡⲓϣⲙⲛⲧ’ϩⲟⲟⲩⲧ’· ϩⲛ ⲟⲩ‐ <text:line-break/><text:span text:style-name="T1"> </text:span><text:span text:style-name="T2">(24/5) </text:span> ⲡ̅ⲛ̅ⲁ̅ ⲇⲉ ⲉϥⲟⲩⲁⲁⲃ ⲛⲁⲛⲓⲡⲣⲱⲧⲟⲫⲁ‐ <text:line-break/><text:span text:style-name="T1"> </text:span><text:span text:style-name="T2">(24/6) </text:span> ⲛⲏⲥ· ϣⲁϥⲥⲱⲧⲙ ⲇⲉ ⲉⲧⲃⲉ ⲡⲓⲕⲗ̅ⲥ̅ <text:line-break/><text:span text:style-name="T1"> </text:span><text:span text:style-name="T2">(24/7) </text:span> ⲉⲃⲟⲗ ϩⲓⲧⲛ ⲛⲓϭⲟⲙ ⲛⲧⲉ ⲡⲓⲡⲛ̅ⲁ̅ ⲉⲧⲁⲩ‐ <text:line-break/><text:span text:style-name="T1"> </text:span><text:span text:style-name="T2">(24/8) </text:span> ⲉⲓ ⲉⲃⲟⲗ ⲙⲙⲟϥ ϩⲛ 〈ⲟⲩ〉ⲟⲩⲱⲛϩ ⲉⲃⲟⲗ ⲉϥ‐ <text:line-break/><text:span text:style-name="T1"> </text:span><text:span text:style-name="T2">(24/9) </text:span> ⲥⲟⲧⲡ’ ⲛϩⲟⲩⲟ ⲛⲧⲉ ⲡⲓⲁϩⲟⲣⲁⲧⲟⲛ ⲙ <text:line-break/><text:span text:style-name="T1"> </text:span><text:span text:style-name="T2">(24/10) </text:span> ⲡⲛ̅ⲁ̅· ϩⲣⲁⲓ̈ ⲇⲉ ϩⲛ ϯⲉⲛⲛⲟⲓⲁ ⲧⲁⲓ̈ ⲉⲧ’‐ <text:line-break/><text:span text:style-name="T1"> </text:span><text:span text:style-name="T2">(24/11) </text:span> ϣⲟⲟⲡ’ ϯⲛⲟⲩ ϩⲛ ⲟⲩⲥⲓⲅⲏ· ⲛϩⲣⲁⲓ̈ ⲇⲉ <text:line-break/><text:span text:style-name="T1"> </text:span><text:span text:style-name="T2">(24/12) </text:span> ϩⲛ ϯϣⲟⲣⲡ’ ⲛ ⲉⲛⲛⲟⲓⲁ· ⲉⲧⲃⲉ ⲡⲓϣⲙⲧ’‐ <text:line-break/><text:span text:style-name="T1"> </text:span><text:span text:style-name="T2">(24/13) </text:span> ϭⲟⲙ ⲛ ⲁϩⲟⲣⲁⲧⲟⲛ ⲙ ⲡⲛ̅ⲁ̅ ⲉⲩⲥⲱⲧⲙ <text:line-break/><text:span text:style-name="T1"> </text:span><text:span text:style-name="T2">(24/14) </text:span> ϭⲉ ⲡⲉ ⲙⲛ ⲟⲩϭⲟⲙ ⲛⲧⲉ ⲟⲩⲥⲓⲅⲏ ⲉⲥ‐ <text:line-break/><text:span text:style-name="T1"> </text:span><text:span text:style-name="T2">(24/15) </text:span> ⲧⲟⲩⲃⲏⲟⲩⲧ’ ϩⲛ ⲟⲩ̣[ⲡ̅]ⲛ̣̅ⲁ̅ ⲉϥⲧⲁⲛϩⲟ <text:line-break/><text:span text:style-name="T1"> </text:span><text:span text:style-name="T2">(24/16) </text:span> ϯⲧⲉⲗⲓⲟⲥ ⲁⲩⲱ ⲛ.[.].[.] ⲛ̅ ⲧⲉⲗⲓⲟⲥ <text:line-break/><text:span text:style-name="T1"> </text:span><text:span text:style-name="T2">(24/17) </text:span> ⲁⲩⲱ ⲙ ⲡⲁⲛⲧⲉ[ⲗⲓⲟ]ⲥ̣· ⲥⲉϣⲟⲟⲡ’ <text:line-break/><text:span text:style-name="T1"> </text:span><text:span text:style-name="T2">(24/18) </text:span> ⲟⲩⲛ ⲛϭⲓ ϩⲉⲛⲉⲟ[ⲟⲩ ⲉ]ⲩⲧⲏϣ ⲉϩⲣⲁⲓ̈ <text:line-break/><text:span text:style-name="T1"> </text:span><text:span text:style-name="T2">(24/19) </text:span> ⲉϫⲛ ⲛⲁⲓ̈ ⲛ ⲣⲉϥⲧ[ⲁⲛϩⲟ] ⲛ̣ⲏ ⲉⲧⲁⲩϫⲓ <text:line-break/><text:span text:style-name="T1"> </text:span><text:span text:style-name="T2">(24/20) </text:span> ⲱⲙⲥ ⲛ ⲧⲁⲡⲙⲉ̣ [ⲙ]ⲛ ⲟⲩⲅⲛⲱⲥⲓⲥ· <text:line-break/><text:soft-page-break/><text:span text:style-name="T1"> </text:span><text:span text:style-name="T2">(24/21) </text:span> ⲁⲩⲱ ⲛⲏ ⲙⲉ[ⲛ ⲉ]ⲧⲙⲡϣⲁ ϣⲁⲩⲁⲣ[ⲉϩ] <text:line-break/><text:span text:style-name="T1"> </text:span><text:span text:style-name="T2">(24/22) </text:span> ⲉⲣⲟⲟⲩ· ⲛⲏ ⲇ[ⲉ] ⲉⲧⲉ ϩⲉⲛⲉⲃⲟⲗ ϩⲙ <text:line-break/><text:span text:style-name="T1"> </text:span><text:span text:style-name="T2">(24/23) </text:span> ⲡⲉⲓ̈ⲅⲉⲛⲟⲥ ⲁⲛ [ⲛⲉ .]..[..]ⲁⲩ[ <text:line-break/><text:span text:style-name="T1"> </text:span><text:span text:style-name="T2">(24/24) </text:span> ⲁⲩⲱ ϣ̣[ⲁ]ⲩⲃⲱ̣[ⲕ.....] .ⲁⲓ̈ ⲉ̣‐ <text:line-break/><text:span text:style-name="T1"> </text:span><text:span text:style-name="T2">(24/25) </text:span> ⲧⲉⲩⲛⲧ[.]ⲛⲉ ⲙ[ <text:line-break/><text:span text:style-name="T1"> </text:span><text:span text:style-name="T2">(24/26) </text:span> ⲉⲃⲟⲗ [.. ϩ]ⲙ ⲡ[ⲓⲙ]ⲉ̣ϩϯⲟⲩ ⲉϣⲁϥ‐ [ <text:line-break/><text:span text:style-name="T1"> </text:span><text:span text:style-name="T2">(24/27) </text:span> ⲱ[ ]ⲁⲛⲧⲓⲧⲩⲡⲟⲥ <text:line-break/><text:span text:style-name="T1"> </text:span><text:span text:style-name="T2">(24/28) </text:span> ⲕ[ ]ⲁ ⲛ̅ⲧⲉ ⲛⲓⲁⲓⲱⲛ <text:line-break/><text:span text:style-name="T1"> </text:span><text:span text:style-name="T2">(24/29) </text:span> ⲟ̣[ ] ⲛϭⲓ ⲟⲩϫⲱⲕⲙ <text:line-break/><text:span text:style-name="T1"> </text:span><text:span text:style-name="T2">(24/30) </text:span> [ ]ⲉ· ⲉϣⲱⲡⲉ ⲇⲉ ⲉⲣ‐ <text:line-break/><text:span text:style-name="T1"> </text:span><text:span text:style-name="T2">(24/31) </text:span> [ϣⲁ ⲟⲩⲁ] ⲕ̣ⲁⲕϥ ⲁϩⲏⲟⲩ ⲙ ⲡⲕⲟⲥ‐ <text:line-break/><text:span text:style-name="T1"> </text:span><text:span text:style-name="T2">(25/1) </text:span> ⲙⲟⲥ ⲁⲩⲱ ⲛϥⲕⲱ ⲉϩⲣⲁ̣ⲓ̣̈ [ⲛ ϯⲅⲛⲱⲥ]ⲓⲥ· <text:line-break/><text:span text:style-name="T1"> </text:span><text:span text:style-name="T2">(25/2) </text:span> ⲁⲩⲱ ⲡⲏ ⲙⲉⲛ ⲉⲧⲉ ⲙⲙⲛ[ⲧⲁϥ ⲛ ⲟ]ⲩ‐ <text:line-break/><text:span text:style-name="T1"> </text:span><text:span text:style-name="T2">(25/3) </text:span> ⲙⲁ ⲛ ϣⲱⲡⲉ ⲙⲛ ⲟⲩϭⲟⲙ· ⲁ[ⲩⲱ] ⲉϥ‐ <text:line-break/><text:span text:style-name="T1"> </text:span><text:span text:style-name="T2">(25/4) </text:span> ⲟⲩⲏϩ ⲛⲥⲁ ϩⲉⲛϩⲏⲃⲩⲉ ⲛⲧⲉ ϩⲉⲛ̣‐ <text:line-break/><text:span text:style-name="T1"> </text:span><text:span text:style-name="T2">(25/5) </text:span> ⲕⲟⲟⲩⲉ ϥϭⲁⲗⲏⲟⲩⲧ’· ⲡⲏ ⲇⲉ ⲉⲧⲉ <text:line-break/><text:span text:style-name="T1"> </text:span><text:span text:style-name="T2">(25/6) </text:span> ⲙⲡϥⲉⲓⲣⲉ ⲛ ⲗⲁⲁⲩ ⲛ ⲛⲟⲃⲉ ⲉⲥⲣⲱ‐ <text:line-break/><text:span text:style-name="T1"> </text:span><text:span text:style-name="T2">(25/7) </text:span> ϣⲉ ⲛⲁⲩ ⲛϭⲓ ⲟⲩⲅⲛⲱⲥⲓⲥ· ⲉϥϥⲓ ⲙ <text:line-break/><text:span text:style-name="T1"> </text:span><text:span text:style-name="T2">(25/8) </text:span> ⲡⲣⲟⲟⲩϣ ⲛ ⲗⲁⲁⲩ ⲁⲛ ⲉϥⲣ ⲙⲉⲧⲁ‐ <text:line-break/><text:span text:style-name="T1"> </text:span><text:span text:style-name="T2">(25/9) </text:span> ⲛⲟⲉⲓ· ⲟⲩⲛ ϩⲉⲛϫⲱⲕⲙ ⲇⲉ ⲧⲏϣ <text:line-break/><text:span text:style-name="T1"> </text:span><text:span text:style-name="T2">(25/10) </text:span> ϩⲛ ⲛⲁⲓ̈ ⲛ ⲧⲟⲩϩⲉ· ϯϩⲓⲏ ⲇⲉ ⲉ‐ <text:line-break/><text:span text:style-name="T1"> </text:span><text:span text:style-name="T2">(25/11) </text:span> ϩⲟⲩⲛ ⲉ ⲛⲓⲁⲩⲧⲟⲅⲉⲛⲏⲥ· ⲡⲏ ϯ‐ <text:line-break/><text:span text:style-name="T1"> </text:span><text:span text:style-name="T2">(25/12) </text:span> ⲛⲟ̣ⲩ̣ ⲉⲧⲁⲕϫⲓ ⲱⲙⲥ ⲛϩⲏⲧϥ ⲛ ⲥⲟⲡ’ <text:line-break/><text:span text:style-name="T1"> </text:span><text:span text:style-name="T2">(25/13) </text:span> ⲛⲓⲙ ⲉⲧⲥⲙ̣[ⲡ]ϣⲁ ⲉ ⲛⲁⲩ ⲉ ⲛⲓⲕⲁⲧⲁ <text:line-break/><text:span text:style-name="T1"> </text:span><text:span text:style-name="T2">(25/14) </text:span> ⲟ̣ⲩⲁ ⲛ [ⲧⲉⲗⲓⲟ]ⲥ̣· ⲉⲩⲅⲛⲱⲥⲓⲥ ⲡⲉ <text:line-break/><text:span text:style-name="T1"> </text:span><text:span text:style-name="T2">(25/15) </text:span> ⲛⲧⲉ ⲡⲧⲏⲣϥ̣ [ⲉⲧ]ⲁⲥϣⲱⲡⲉ ⲉⲃⲟⲗ <text:line-break/><text:span text:style-name="T1"> </text:span><text:span text:style-name="T2">(25/16) </text:span> ϩⲛ ⲛⲓϭ̣ⲟⲙ ⲛ̣[ⲧⲉ] ⲛⲓⲁⲩⲧⲟⲅⲉⲛⲏⲥ <text:line-break/><text:span text:style-name="T1"> </text:span><text:span text:style-name="T2">(25/17) </text:span> ⲡⲏ ⲉⲧⲕⲕ̣ⲁⲁ̣[ϥ·] ⲉⲕϣⲁⲛⲟⲩⲱ‐ <text:line-break/><text:span text:style-name="T1"> </text:span><text:span text:style-name="T2">(25/18) </text:span> ⲧⲃ ⲛ ⲛⲓⲉⲱⲛ ⲙ [ⲡⲁ]ⲛⲧⲉⲗⲓⲟⲥ· ⲡⲓ‐ <text:line-break/><text:span text:style-name="T1"> </text:span><text:span text:style-name="T2">(25/19) </text:span> ⲙⲉϩϣⲟⲙⲧ’ ⲇⲉ [ⲛ] ϫⲱⲕⲙ ⲉⲕϣⲁⲛ‐ <text:line-break/><text:span text:style-name="T1"> </text:span><text:span text:style-name="T2">(25/20) </text:span> ϫⲱⲕ̣ⲙ̣ ⲉ̣ ..[....]ⲧⲉ ⲉⲕⲉⲥⲱⲧⲙ <text:line-break/><text:span text:style-name="T1"> </text:span><text:span text:style-name="T2">(25/21) </text:span> ⲉ ⲛⲓ̣[.........] ⲟⲛ̣[ⲧ]ⲱⲥ ⲙ ⲡⲓⲙⲁ <text:line-break/><text:span text:style-name="T1"> </text:span><text:span text:style-name="T2">(25/22) </text:span> ⲉ[........ ⲉ]ⲧⲃⲉ [ⲛⲉ]ⲓ̣̈ⲣ̣ⲁⲛ ⲇⲉ <text:line-break/><text:span text:style-name="T1"> </text:span><text:span text:style-name="T2">(25/23) </text:span> ⲉⲩϣⲟⲟⲡ’̣ ⲙ̣ [ⲡ]ⲉⲓ̈ⲣ[ⲏⲧ]ⲉ ⲉⲟⲩⲁ <text:line-break/><text:span text:style-name="T1"> </text:span><text:span text:style-name="T2">(25/24) </text:span> ⲇⲉ ⲡⲉ ⲁⲩ[ ]ⲧ’ <text:line-break/><text:span text:style-name="T1"> </text:span><text:span text:style-name="T2">(25/25) </text:span> ⲡⲉ ⲙ̅ ⲡⲣⲏⲧ̣[ ]ⲕ <text:line-break/><text:span text:style-name="T1"> </text:span><text:span text:style-name="T2">(25/26) </text:span> ϩⲙ ⲡⲧⲣⲉⲩϣⲱ̣[.........] <text:line-break/><text:span text:style-name="T1"> </text:span><text:span text:style-name="T2">(25/27) </text:span> ϣⲟⲟⲡ’ ⲁⲩⲱ ⲉⲁ[........] <text:line-break/><text:span text:style-name="T1"> </text:span><text:span text:style-name="T2">(25/28) </text:span> ⲟⲩϣⲁϫⲉ ⲛⲧⲁⲩⲡⲟ̣[.....] <text:line-break/><text:span text:style-name="T1"> </text:span><text:span text:style-name="T2">(26/1) </text:span> ⲡⲁⲓ̈ ⲡⲉ̣ ⲟ̣ⲩⲣⲁⲛ ⲉϥϣⲟⲟⲡ’ ⲟⲛⲧⲱⲥ <text:line-break/><text:span text:style-name="T1"> </text:span><text:span text:style-name="T2">(26/2) </text:span> ⲙ[ⲛ ...] ⲉⲧⲉⲩⲉ ⲙⲙⲟⲥ· ⲁⲩⲱ <text:line-break/><text:span text:style-name="T1"> </text:span><text:span text:style-name="T2">(26/3) </text:span> ⲥ[ⲉϣⲟ]ⲟⲡ’ ⲛϭⲓ ⲛⲉⲧ’ϣⲟⲟⲡ’ ϩⲛ ⲟⲩ‐ <text:line-break/><text:span text:style-name="T1"> </text:span><text:span text:style-name="T2">(26/4) </text:span> ⲛⲟ̣[ⲩϩ]ⲙ ⲉⲛⲉⲧⲉ ⲉϥⲉⲓⲛⲉ· ⲁⲩⲱ ⲡⲉϥ‐ <text:line-break/><text:span text:style-name="T1"> </text:span><text:span text:style-name="T2">(26/5) </text:span> ⲉⲓ̣ⲛ̣ⲉ ϩⲙ ⲡⲅⲉⲛⲟⲥ ⲛϩⲣⲁⲓ̈ ϩⲙ ⲡⲉⲧⲉ <text:line-break/><text:span text:style-name="T1"> </text:span><text:span text:style-name="T2">(26/6) </text:span> ⲡⲱϥ· ϣⲁϥⲛⲁⲩ ⲇⲉ ⲁⲩⲱ ϣⲁϥⲙⲙⲉ <text:line-break/><text:span text:style-name="T1"> </text:span><text:span text:style-name="T2">(26/7) </text:span> ⲁⲩⲱ ϣⲁϥⲃⲱⲕ ⲉϩⲟⲩⲛ ⲉⲣⲟϥ ⲁⲩⲱ <text:line-break/><text:span text:style-name="T1"> </text:span><text:span text:style-name="T2">(26/8) </text:span> ϣⲁϥϫⲓ ⲉⲓⲛⲉ̣ ⲙⲙⲟϥ· ϩⲛ ⲟⲩⲥⲙⲏ ⲇⲉ <text:line-break/><text:soft-page-break/><text:span text:style-name="T1"> </text:span><text:span text:style-name="T2">(26/9) </text:span> ⲉ ϫⲟⲟϥ ⲁⲩⲱ ⲉ ⲥⲱⲧⲙ· ϩⲛ ⲟⲩⲥⲱⲧⲙ <text:line-break/><text:span text:style-name="T1"> </text:span><text:span text:style-name="T2">(26/10) </text:span> ⲇⲉ ⲥⲉⲉ ⲛ ⲁⲧ’ϭⲟⲙ ⲉϩⲉⲛⲉⲥⲑⲏⲧⲟⲛ <text:line-break/><text:span text:style-name="T1"> </text:span><text:span text:style-name="T2">(26/11) </text:span> ⲛⲉ ⲁⲩⲱ ⲛ ⲥⲱⲙⲁⲧⲓⲕⲟⲛ· ⲙ ⲡⲣⲏⲧⲉ <text:line-break/><text:span text:style-name="T1"> </text:span><text:span text:style-name="T2">(26/12) </text:span> ⲟⲩⲛ ⲉϣⲁⲩϭⲙϭⲟⲙ ⲉ ϣⲱ̣ⲡ’ ⲉⲣⲟ‐ <text:line-break/><text:span text:style-name="T1"> </text:span><text:span text:style-name="T2">(26/13) </text:span> ⲟⲩ· ⲉϣⲁⲩϣⲱⲡ’ ⲉⲣⲟⲟⲩ ⲙ ⲡⲉⲓ̈ⲣⲏ̣‐ <text:line-break/><text:span text:style-name="T1"> </text:span><text:span text:style-name="T2">(26/14) </text:span> ⲧⲉ ⲁⲩⲱ ⲟⲩⲉⲓⲇⲱ[ⲗⲟ]ⲛ̣ ⲡⲉ ⲉϥⲗ̣ⲟϫ̣[ϩ] <text:line-break/><text:span text:style-name="T1"> </text:span><text:span text:style-name="T2">(26/15) </text:span> ⲙ ⲡⲉⲓ̈ⲣⲏⲧⲉ ⲉϣ̣[ⲁϥ]ϣⲱ̣ⲡⲉ ⲉⲃⲟⲗ <text:line-break/><text:span text:style-name="T1"> </text:span><text:span text:style-name="T2">(26/16) </text:span> ϩⲛ ⲟⲩⲁⲓⲥⲑⲏⲥ[ⲓⲥ ϩ]ⲛ ⲟⲩϣⲁϫⲉ <text:line-break/><text:span text:style-name="T1"> </text:span><text:span text:style-name="T2">(26/17) </text:span> ⲉϥⲥⲟⲧⲡ’ ⲙⲉⲛ ⲉ [ϯⲫ]ⲩⲥⲓⲥ ⲛ ϩⲩⲗⲓ‐ <text:line-break/><text:span text:style-name="T1"> </text:span><text:span text:style-name="T2">(26/18) </text:span> ⲕⲟⲛ· ⲉϥⲑⲉⲃⲓⲏ[ⲩ] ⲇ̣ⲉ̣ [ʹ264] ⲉ ϯⲟⲩⲥⲓⲁ <text:line-break/><text:span text:style-name="T1"> </text:span><text:span text:style-name="T2">(26/19) </text:span> §ⲛ ⲛⲟⲉⲣⲟⲛ· [ʹ264 ⲉ]ⲧⲃⲉ ⲧⲇⲓⲁⲫⲟⲣⲁ ⲇⲉ <text:line-break/><text:span text:style-name="T1"> </text:span><text:span text:style-name="T2">(26/20) </text:span> ⲛⲧⲉ ⲛⲓⲯⲩⲭⲏ [ⲙ]ⲡⲣⲣ ϣⲡⲏⲣⲉ· ϩⲙ <text:line-break/><text:span text:style-name="T1"> </text:span><text:span text:style-name="T2">(26/21) </text:span> ⲡⲧⲣⲉⲩⲙⲉⲉⲩ̣ⲉ ⲇⲉ ϫⲉ ⲥⲉϣⲉⲃ̣ⲓⲏ̣‐ <text:line-break/><text:span text:style-name="T1"> </text:span><text:span text:style-name="T2">(26/22) </text:span> ⲟⲩⲧ’ ⲛⲥⲉⲉⲓⲛ̣[ⲉ ⲁⲛ...ϣ]ⲁ̣ⲣⲟ̣ⲛ <text:line-break/><text:span text:style-name="T1"> </text:span><text:span text:style-name="T2">(26/23) </text:span> ⲛⲉ ⲛⲧⲉ ⲛ̣[ⲏ] ⲉⲧ’ⲙ[........] ⲙⲛ <text:line-break/><text:span text:style-name="T1"> </text:span><text:span text:style-name="T2">(26/24) </text:span> ⲡⲏ ⲙⲟ̣.[.] ϣⲁϥ̣[...]ⲱ̣[..] ⲉⲃⲟⲗ <text:line-break/><text:span text:style-name="T1"> </text:span><text:span text:style-name="T2">(26/25) </text:span> ϩⲛ ⲟⲩ[ⲥⲙ]ⲏ .[...] ⲉϥⲧⲁⲕⲏⲟⲩⲧ’ <text:line-break/><text:span text:style-name="T1"> </text:span><text:span text:style-name="T2">(26/26) </text:span> ⲉⲡ̣[ ]ⲭⲏ ⲛⲧⲁⲩⲛ <text:line-break/><text:span text:style-name="T1"> </text:span><text:span text:style-name="T2">(26/27) </text:span> ⲥ[ ]ⲩⲥⲱⲙⲁ· ⲡⲏ ⲇⲉ <text:line-break/><text:span text:style-name="T1"> </text:span><text:span text:style-name="T2">(26/28) </text:span> ⲉ[........]ⲉϥⲭⲣⲟⲛⲟⲥ ⲉϣⲁϥ‐ <text:line-break/><text:span text:style-name="T1"> </text:span><text:span text:style-name="T2">(26/29) </text:span> ⲥ̣[.......]ⲗ ⲛ ⲟⲩⲟⲉⲓϣ ⲉⲣⲉ‐ <text:line-break/><text:span text:style-name="T1"> </text:span><text:span text:style-name="T2">(27/1) </text:span> ⲧⲉⲩⲯⲭⲏ ϣⲟⲟ̣ⲡ’ ⲛ [....... <text:line-break/><text:span text:style-name="T1"> </text:span><text:span text:style-name="T2">(27/2) </text:span> ⲡⲟⲩⲥⲱⲙⲁ· ⲛⲏ ⲙⲉⲛ ⲉⲧ̣[ⲧⲟⲩⲃⲏ]‐ <text:line-break/><text:span text:style-name="T1"> </text:span><text:span text:style-name="T2">(27/3) </text:span> ⲟⲩⲧ’ ⲉ ⲡⲧⲏⲣϥ ϥⲧⲟⲟⲩ ⲛ̣[....]ⲥ <text:line-break/><text:span text:style-name="T1"> </text:span><text:span text:style-name="T2">(27/4) </text:span> ⲉⲧⲛⲧⲁⲩ· ⲛⲏ ⲇⲉ ⲉⲧⲉ ⲛ̣[ϩⲣⲁⲓ̈ ϩⲛ ⲟ]ⲩ‐ <text:line-break/><text:span text:style-name="T1"> </text:span><text:span text:style-name="T2">(27/5) </text:span> ⲭⲣⲟⲛⲟⲥ ⲡⲥⲉⲓⲧ’ ⲛⲉ· ⲧⲟⲩⲉⲓ ⲧⲟ̣ⲩⲉⲓ <text:line-break/><text:span text:style-name="T1"> </text:span><text:span text:style-name="T2">(27/6) </text:span> ⲙⲙⲟⲟⲩ· ⲟⲩⲛⲧⲁϥ ⲙ ⲡⲉⲥⲉⲓⲇⲟⲥ <text:line-break/><text:span text:style-name="T1"> </text:span><text:span text:style-name="T2">(27/7) </text:span> ⲙⲛ ⲡⲉⲥⲧⲱⲡ’ ⲁⲩⲱ ⲉⲩⲉⲓⲛⲉ ⲥⲉ‐ <text:line-break/><text:span text:style-name="T1"> </text:span><text:span text:style-name="T2">(27/8) </text:span> ϣⲉⲃⲓⲏⲟⲩⲧ’ ⲉⲩⲡⲱⲣϫ ⲉⲃⲟⲗ· ⲁⲩⲱ <text:line-break/><text:span text:style-name="T1"> </text:span><text:span text:style-name="T2">(27/9) </text:span> ⲥⲉⲁϩⲉⲣⲁⲧⲟ· ⲁⲩⲱ ⲉⲩⲣ ϣⲃⲏⲣ <text:line-break/><text:span text:style-name="T1"> </text:span><text:span text:style-name="T2">(27/10) </text:span> ⲛ ϣⲱⲡⲉ ⲙⲛ ⲛⲁⲓ̈ⲯⲩⲭⲏ ⲧⲏⲣⲟⲩ <text:line-break/><text:span text:style-name="T1"> </text:span><text:span text:style-name="T2">(27/11) </text:span> ⲛϭⲓ ϩⲉⲛⲕⲉⲁⲧⲙⲟⲩ ⲙ ⲯⲩⲭⲏ ⲉⲧⲃⲉ <text:line-break/><text:span text:style-name="T1"> </text:span><text:span text:style-name="T2">(27/12) </text:span> ϯ[ⲥⲟ]ⲫⲓⲁ ⲉⲧⲁⲥϭⲱϣⲧ’ ⲉ ⲡⲉⲥⲏⲧ’ <text:line-break/><text:span text:style-name="T1"> </text:span><text:span text:style-name="T2">(27/13) </text:span> ϣ̣ⲟ̣ⲙⲧ’ ⲅⲁⲣ ⲛ ⲉⲓⲇⲟⲥ ⲛⲉ ⲛⲧ[ⲉ] ⲛⲓⲯⲩ‐ <text:line-break/><text:span text:style-name="T1"> </text:span><text:span text:style-name="T2">(27/14) </text:span> ⲭ̣[ⲏ] ⲛ̣ⲛ ⲁⲧ̣[ⲙⲟ]ⲩ· ⲙⲛ ⲛⲏ ⲙⲉⲛ ⲉⲧⲁⲩ‐ <text:line-break/><text:span text:style-name="T1"> </text:span><text:span text:style-name="T2">(27/15) </text:span> ϫⲓ̣ ⲛⲟⲩ̣ⲛⲉ [ⲉⲃ]ⲟⲗ ϩⲓϫⲛ ϯⲡⲁⲣⲟⲓⲕⲏ‐ <text:line-break/><text:span text:style-name="T1"> </text:span><text:span text:style-name="T2">(27/16) </text:span> ⲥⲓⲥ̣ ⲉⲙⲛ[ⲧⲁⲩ] ⲙⲙⲁⲩ ⲛ ⲟⲩϭⲟⲙ <text:line-break/><text:span text:style-name="T1"> </text:span><text:span text:style-name="T2">(27/17) </text:span> ⲛ ϫⲡⲟ ⲉ[ⲥⲛⲙ]ⲙⲁⲩ ⲙⲁⲩⲁ[ⲁ]ⲩ <text:line-break/><text:span text:style-name="T1"> </text:span><text:span text:style-name="T2">(27/18) </text:span> ⲉⲩⲟⲩⲏϩ ⲛ[ⲥⲁ ϩ]ⲉⲛϩⲃⲏⲩⲉ ⲛⲧⲉ <text:line-break/><text:span text:style-name="T1"> </text:span><text:span text:style-name="T2">(27/19) </text:span> ϩⲉⲛⲕⲟⲟⲩⲉ· ⲡ[ⲏ] ⲇⲉ ⲉⲩⲉⲓⲇⲟⲥ ⲛ <text:line-break/><text:span text:style-name="T1"> </text:span><text:span text:style-name="T2">(27/20) </text:span> ⲟⲩⲱⲧ’ ⲡⲉ̣ ⲉⲛ̣ⲧ̣ⲟϥ ⲡⲉⲧⲟⲩⲣ <text:line-break/><text:span text:style-name="T1"> </text:span><text:span text:style-name="T2">(27/21) </text:span> .ⲁ[........]ϥ· ⲛⲏ ⲇⲉ ⲉⲧⲁϩⲉ‐ <text:line-break/><text:span text:style-name="T1"> </text:span><text:span text:style-name="T2">(27/22) </text:span> ⲣⲁ[ⲧⲟⲩ ϩⲓϫⲛ ⲧ]ⲙⲉ[ⲧ]ⲁ̣ⲛⲟⲓⲁ ⲉⲧⲉ <text:line-break/><text:span text:style-name="T1"> </text:span><text:span text:style-name="T2">(27/23) </text:span> ⲙ[..]ϥⲣ[..]..ⲁ.[..]ⲛⲟⲃⲉ· <text:line-break/><text:span text:style-name="T1"> </text:span><text:span text:style-name="T2">(27/24) </text:span> ⲉⲥⲣⲱϣ̣ⲉ̣ [..] ϩ̣ⲉ̣[...]ⲅ̣ⲛⲱⲥⲓⲥ <text:line-break/><text:span text:style-name="T1"> </text:span><text:span text:style-name="T2">(27/25) </text:span> ⲉⲩⲃⲣⲣⲉ ⲡ̣[..........] ⲟⲩⲛ‐ <text:line-break/><text:span text:style-name="T1"> </text:span><text:span text:style-name="T2">(27/26) </text:span> ⲧⲁϥ ⲇⲉ ⲙⲙ[ⲁⲩ..... ⲇⲓ]ⲁ‐ <text:line-break/><text:soft-page-break/><text:span text:style-name="T1"> </text:span><text:span text:style-name="T2">(27/27) </text:span> ⲫⲟⲣⲁ· ⲟⲩⲁⲛⲛⲛ[.......]ⲁ̣ⲩⲣ <text:line-break/><text:span text:style-name="T1"> </text:span><text:span text:style-name="T2">(27/28) </text:span> ⲛⲟⲃⲉ ⲙⲛ ϩⲉⲛⲕⲟⲟ[ⲩⲉ...] <text:line-break/><text:span text:style-name="T1"> </text:span><text:span text:style-name="T2">(28/1) </text:span> ⲁⲩ[ⲣ ⲙⲉ]ⲧⲁⲛⲟ̣ⲉⲓ ⲙⲛ ϩⲉⲛⲕⲟⲟⲩⲉ <text:line-break/><text:span text:style-name="T1"> </text:span><text:span text:style-name="T2">(28/2) </text:span> [.....]ⲥ̣ ⲉⲃⲟⲗ ⲙⲙⲟⲟⲩ ⲙⲁⲩⲁⲁⲩ <text:line-break/><text:span text:style-name="T1"> </text:span><text:span text:style-name="T2">(28/3) </text:span> .[....] ⲅⲁⲣ ⲛ ⲉⲓⲇⲟⲥ ⲉⲧ’ϣⲟⲟⲡ’ ⲛ‐ <text:line-break/><text:span text:style-name="T1"> </text:span><text:span text:style-name="T2">(28/4) </text:span> ⲧⲟ̣[...] ⲙⲛ ⲛⲏ ⲙⲉⲛ ⲉⲧⲁⲩⲉⲓⲣⲉ ⲛ̣ <text:line-break/><text:span text:style-name="T1"> </text:span><text:span text:style-name="T2">(28/5) </text:span> ⲛ[ⲓ]ⲛ̣ⲟ̣ⲃⲉ̣ ⲧⲏⲣⲟⲩ ⲁⲩⲱ ⲁⲩⲣ ⲙⲉⲧⲁ‐ <text:line-break/><text:span text:style-name="T1"> </text:span><text:span text:style-name="T2">(28/6) </text:span> ⲛⲟⲉⲓ· ⲏ%0 ϩⲉⲛⲙⲉⲣⲟⲥ ⲛⲉ ⲏ%0 ⲛⲧⲟⲟⲩ <text:line-break/><text:span text:style-name="T1"> </text:span><text:span text:style-name="T2">(28/7) </text:span> ʹ30ⲉⲁⲩⲱϣ ⲉⲃⲟⲗ ʹ30 ⲙⲙⲟⲟⲩ ⲙⲁⲩⲁⲁⲩ <text:line-break/><text:span text:style-name="T1"> </text:span><text:span text:style-name="T2">(28/8) </text:span> ⲉⲧⲃⲉ ⲡⲁⲓ̈ ⲛⲉⲩⲕⲉⲉⲱⲛ ⲥⲟⲟ̣ⲩ ⲛⲉ <text:line-break/><text:span text:style-name="T1"> </text:span><text:span text:style-name="T2">(28/9) </text:span> ⲕⲁⲧⲁ ⲡⲓⲧⲟⲡⲟⲥ ⲉⲧ’ⲡⲏϩ ⲉⲣⲟⲟⲩ <text:line-break/><text:span text:style-name="T1"> </text:span><text:span text:style-name="T2">(28/10) </text:span> ϩⲛ ϯⲟⲩⲉⲓ ⲧⲟⲩⲉⲓ ⲙⲙⲟⲟⲩ· ⲡⲓⲙⲉϩ‐ <text:line-break/><text:span text:style-name="T1"> </text:span><text:span text:style-name="T2">(28/11) </text:span> ϣⲟⲙⲧ’ ⲇⲉ ⲡⲉ ⲡⲁⲛⲓⲯⲩⲭⲏ ⲛⲧⲉ <text:line-break/><text:span text:style-name="T1"> </text:span><text:span text:style-name="T2">(28/12) </text:span> ⲛⲓⲁⲩⲧⲟⲅⲉⲛⲓⲟⲛ ⲉⲩⲛⲧⲁⲩ ⲙⲙⲁⲩ <text:line-break/><text:span text:style-name="T1"> </text:span><text:span text:style-name="T2">(28/13) </text:span> ⲛ ⲟⲩϣⲁϫⲉ ⲛⲧⲉ ϯⲙⲛⲧⲙⲉ ⲛ̣ ⲁ̣ⲧ’‐ <text:line-break/><text:span text:style-name="T1"> </text:span><text:span text:style-name="T2">(28/14) </text:span> ϣⲁϫⲉ ⲙⲙⲟϥ ⲉϥϣⲟ[ⲟ]ⲡ’ ϩⲛ̣ ⲟ̣ⲩ‐ <text:line-break/><text:span text:style-name="T1"> </text:span><text:span text:style-name="T2">(28/15) </text:span> ⲅⲛⲱⲥⲓⲥ ⲙⲛ ⲟⲩϭⲟ̣[ⲙ ⲉⲃ]ⲟⲗ ⲙⲙ̣[ⲟ]‐ <text:line-break/><text:span text:style-name="T1"> </text:span><text:span text:style-name="T2">(28/16) </text:span> ⲟⲩ ⲙⲁⲩⲁⲁⲩ ⲙⲛ̣ [....]ϩ ⲛ ϣ̣[ⲁ] ⲉ‐ <text:line-break/><text:span text:style-name="T1"> </text:span><text:span text:style-name="T2">(28/17) </text:span> ⲛⲉϩ· ⲉⲩⲛⲧⲁⲩ [ⲇⲉ] ⲙⲙⲁⲩ ⲛ̣ ϥ̣ⲧⲟⲟⲩ <text:line-break/><text:span text:style-name="T1"> </text:span><text:span text:style-name="T2">(28/18) </text:span> ⲛ ⲇⲓⲁⲫⲟⲣⲁ ⲙ ⲡⲣ[ⲏⲧⲉ] ⲟⲛ ⲉ[ⲧⲟ]ⲩϣⲟ‐ <text:line-break/><text:span text:style-name="T1"> </text:span><text:span text:style-name="T2">(28/19) </text:span> ⲟⲡ’̣ ⲛϭⲓ ⲛⲓⲉⲓⲇⲟ̣[ⲥ] ⲛⲧ̣[ⲉ] ⲛⲓⲁⲅⲅⲉⲗⲟⲥ <text:line-break/><text:span text:style-name="T1"> </text:span><text:span text:style-name="T2">(28/20) </text:span> ⲁⲩⲱ ⲙⲛ ⲛⲏ [ⲉⲧ]ⲣ̣ ⲁⲅⲁⲡⲁ ⲛ ϯⲙⲛⲧⲙⲉ̣ <text:line-break/><text:span text:style-name="T1"> </text:span><text:span text:style-name="T2">(28/21) </text:span> ⲙⲛ ⲛⲏ ⲉⲧⲣ ϩⲉ̣[ⲗ]ⲡⲓⲥ ⲙⲛ ⲛⲏ ⲉⲧⲛⲁϩ‐ <text:line-break/><text:span text:style-name="T1"> </text:span><text:span text:style-name="T2">(28/22) </text:span> ⲧⲉ ⲉⲩⲛⲧⲁⲩ [...]ⲛ ⲛ̣ⲏ [ⲉ]ⲧ’ϩⲟ[.]ⲧ’ <text:line-break/><text:span text:style-name="T1"> </text:span><text:span text:style-name="T2">(28/23) </text:span> ⲁⲩⲱ ⲥⲉϣ̣ⲟⲟ̣[ⲡ’......]ⲏⲓ̅[. <text:line-break/><text:span text:style-name="T1"> </text:span><text:span text:style-name="T2">(28/24) </text:span> ⲥⲉϣⲟⲟ[ⲡ’] ⲉϥⲧ[.........]..[ <text:line-break/><text:span text:style-name="T1"> </text:span><text:span text:style-name="T2">(28/25) </text:span> ⲛⲓⲁⲩⲧ[ⲟⲅⲉ]ⲛⲏⲥ̣ [...]ϣ[..].ⲙⲉ <text:line-break/><text:span text:style-name="T1"> </text:span><text:span text:style-name="T2">(28/26) </text:span> ⲡⲁⲟⲩ[ⲱⲛ]ϩ ⲛ [ⲧⲉⲗ]ⲓ̣ⲟⲥ ⲡⲉ· ⲡⲓⲙ[ⲉϩ]‐ <text:line-break/><text:span text:style-name="T1"> </text:span><text:span text:style-name="T2">(28/27) </text:span> ⲥⲛ[ⲁⲩ..........]ⲙⲉ ⲡⲉ· ⲡⲓ̣‐ <text:line-break/><text:span text:style-name="T1"> </text:span><text:span text:style-name="T2">(28/28) </text:span> ⲙ[..........]ⲁⲟⲩⲅⲛⲱⲥⲓ[ⲥ] .[ <text:line-break/><text:span text:style-name="T1"> </text:span><text:span text:style-name="T2">(28/29) </text:span> ϣ̣[........] ⲡⲓⲙⲉϩϥⲧⲟⲟⲩ̣ <text:line-break/><text:span text:style-name="T1"> </text:span><text:span text:style-name="T2">(28/30) </text:span> ⲡ[ⲁⲛⲓⲯⲩ]ⲭⲏ ⲛⲛ ⲁⲧⲙⲟⲩ ⲡⲉ <text:line-break/><text:span text:style-name="T1"> </text:span><text:span text:style-name="T2">(29/1) </text:span> ⲙ ⲡⲉⲓ̈ⲣⲏⲧⲉ ⲟⲛ ⲥⲉ̣ϣⲟⲟ̣[ⲡ’ ⲙⲙⲁ]ⲩ <text:line-break/><text:span text:style-name="T1"> </text:span><text:span text:style-name="T2">(29/2) </text:span> ⲛϭⲓ [ϥ]ⲧⲟⲟⲩ ⲙ ⲫⲱⲥⲧⲏⲣ [ϥⲕⲏ ⲙ]ⲉⲛ <text:line-break/><text:span text:style-name="T1"> </text:span><text:span text:style-name="T2">(29/3) </text:span> ϩ̣ⲓϫⲛ̣ ⲡⲓϣⲟⲣⲡ’ ⲛⲛ ⲉⲱⲛ ⲛ[ϭⲓ ⲁ̅ⲣ̅ⲙ̅]̅ⲟ̅ⲍ̅ⲏ̅ⲗ̅ <text:line-break/><text:span text:style-name="T1"> </text:span><text:span text:style-name="T2">(29/4) </text:span> [ⲟ]ⲩⲱϣ ⲛⲧⲉ ⲡⲛⲟⲩⲧ̣[ⲉ ..].[..] ⲛ <text:line-break/><text:span text:style-name="T1"> </text:span><text:span text:style-name="T2">(29/5) </text:span> ⲧⲙⲉ ⲙⲛ̣ ⲟⲩϩⲱⲧⲡ’ ⲛ̣ⲧ̣ⲉ ⲟⲩⲯⲩⲭⲏ· <text:line-break/><text:span text:style-name="T1"> </text:span><text:span text:style-name="T2">(29/6) </text:span> ϥⲕⲏ ⲇⲉ ϩⲓ[ϫ]ⲛ ⲡⲓⲙⲉϩⲥⲛⲁⲩ ⲛϭⲓ ⲱ̅ⲣ̅ⲟ̅‐ <text:line-break/><text:span text:style-name="T1"> </text:span><text:span text:style-name="T2">(29/7) </text:span> ⲓ̅̈̅ⲁ̅ⲏ̣̅̅ⲗ̅ ⲟⲩϭⲟ̣ⲙ ⲛ ⲣ̣ⲉϥⲉ̣[ⲓⲱ]ⲣϩ ⲛⲧⲉ <text:line-break/><text:span text:style-name="T1"> </text:span><text:span text:style-name="T2">(29/8) </text:span> ϯⲙⲛⲧⲙⲉ[·] ϥⲕⲏ ⲇⲉ ϩⲓϫⲛ ⲡⲓⲙⲉϩ‐ <text:line-break/><text:span text:style-name="T1"> </text:span><text:span text:style-name="T2">(29/9) </text:span> ϣⲟⲙⲧ’ ⲛϭⲓ ⲇⲁⲩ̣ⲉⲓⲑⲉ ⲟⲩⲉⲓⲱⲣϩ ⲛ‐ <text:line-break/><text:span text:style-name="T1"> </text:span><text:span text:style-name="T2">(29/10) </text:span> ⲧⲉ ⲟⲩⲅⲛⲱⲥ̣[ⲓ]ⲥ̣· ϥⲕⲏ ⲇⲉ ϩⲓϫⲛ ⲡⲓ‐ <text:line-break/><text:span text:style-name="T1"> </text:span><text:span text:style-name="T2">(29/11) </text:span> ⲙⲉ̣[ϩ]ϥⲧⲟⲟⲩ ⲛϭⲓ ⲏⲗⲏⲗⲏⲑ ⲟⲩϩⲟⲣ‐ <text:line-break/><text:span text:style-name="T1"> </text:span><text:span text:style-name="T2">(29/12) </text:span> ⲙ[ⲏ] ⲙ̣ⲛ ⲟⲩϭⲱⲣϭ ϩⲁ ϯⲙⲛⲧⲙⲉ· <text:line-break/><text:span text:style-name="T1"> </text:span><text:span text:style-name="T2">(29/13) </text:span> ⲡ[ⲓϥ]ⲧⲟⲟ̣ⲩ ⲇⲉ ⲥⲉϣⲟⲟⲡ’ ⲉϩ̣ⲉⲛ‐ <text:line-break/><text:span text:style-name="T1"> </text:span><text:span text:style-name="T2">(29/14) </text:span> ϣ̣[ⲁ]ϫⲉ ⲛ[ⲉ ⲛ]ⲧ̣ⲉ ϯⲙⲛⲧⲙⲉ ⲙⲛ ⲟⲩ‐ <text:line-break/><text:span text:style-name="T1"> </text:span><text:span text:style-name="T2">(29/15) </text:span> ⲅ[ⲛ]ⲱⲥⲓ̣[ⲥ] ⲥ̣[ⲉϣ]ⲟⲟⲡ’ ⲇⲉ ⲉⲛⲛⲁⲡⲓ‐ <text:line-break/><text:soft-page-break/><text:span text:style-name="T1"> </text:span><text:span text:style-name="T2">(29/16) </text:span> ⲡⲣ[ⲱ]ⲧⲟⲫ[ⲁⲛⲏ]ⲥ ⲁⲛ ⲛⲉ· ⲁⲗⲗⲁ ⲛⲁ‐ <text:line-break/><text:span text:style-name="T1"> </text:span><text:span text:style-name="T2">(29/17) </text:span> ϯⲙⲁⲁⲩ [ⲛⲉ ⲟ]ⲩⲙⲉⲉⲩⲉ ⲇⲉ ⲛⲧⲉ <text:line-break/><text:span text:style-name="T1"> </text:span><text:span text:style-name="T2">(29/18) </text:span> ⲡⲓⲛⲟⲩⲥ ⲛ ⲧ[ⲉⲗⲓ]ⲟⲥ ⲛⲧⲉ ⲡⲟⲩⲟ‐ <text:line-break/><text:span text:style-name="T1"> </text:span><text:span text:style-name="T2">(29/19) </text:span> ⲉⲓⲛ ⲉ ⲧⲣⲉⲛⲓⲯⲩ̣[ⲭ]ⲏ̣ ⲛⲛ ⲁⲧⲙⲟⲩ <text:line-break/><text:span text:style-name="T1"> </text:span><text:span text:style-name="T2">(29/20) </text:span> ϣ̣ⲱⲡ’ ⲉⲣⲟⲟⲩ [ⲛ] ⲟⲩⲅⲛⲱⲥⲓⲥ· <text:line-break/><text:span text:style-name="T1"> </text:span><text:span text:style-name="T2">(29/21) </text:span> [.]ⲛ.[.]ⲩ̣[.....]ⲉ ⲛⲁⲓ̈ ⲡⲓⲁⲩⲧⲟⲅⲉ‐ <text:line-break/><text:span text:style-name="T1"> </text:span><text:span text:style-name="T2">(29/22) </text:span> [ⲛⲏⲥ.......]ⲟ̣̅ ⲣ̅ⲥ̅ⲉ̣̅̅ [.]ⲟ̅ⲁⲥ̅ ⲟⲩⲱ‐ <text:line-break/><text:span text:style-name="T1"> </text:span><text:span text:style-name="T2">(29/23) </text:span> ⲛϩ [....].[....]ⲟ̣ⲙ ⲡ̣[..]. ⲧⲏⲣⲟⲩ <text:line-break/><text:span text:style-name="T1"> </text:span><text:span text:style-name="T2">(29/24) </text:span> ⲟⲩϣⲁϫⲉ ⲡ̣[ⲉ .]ⲉ ⲛ [...]ⲣⲟⲥ ⲛ‐ <text:line-break/><text:span text:style-name="T1"> </text:span><text:span text:style-name="T2">(29/25) </text:span> ⲛ ⲁⲧ’ϣⲁϫ[ⲉ ........ ϯⲙ]ⲛⲧⲙⲉ· <text:line-break/><text:span text:style-name="T1"> </text:span><text:span text:style-name="T2">(29/26) </text:span> ⲡⲏ ⲉⲧ’ϣⲁϫ̣[ⲉ......ⲟⲩⲱ]ⲛϩ <text:line-break/><text:span text:style-name="T1"> </text:span><text:span text:style-name="T2">(29/27) </text:span> ⲉⲃⲟⲗ ⲉⲧⲃⲉ ⲡ.[........].ⲩⲥ <text:line-break/><text:span text:style-name="T1"> </text:span><text:span text:style-name="T2">(29/28) </text:span> ϫⲉ ⲉϥϣⲟⲟⲡ’ ⲛ [........]ϣⲟ‐ <text:line-break/><text:span text:style-name="T1"> </text:span><text:span text:style-name="T2">(29/29) </text:span> ⲟⲡ’ ⲛⲥⲁ ⲡϣⲱⲓ̈ ϩⲛ [......] ⲁⲧ’‐ <text:line-break/><text:span text:style-name="T1"> </text:span><text:span text:style-name="T2">(30/1) </text:span> ⲡⲟ̣[.....]ⲟⲧⲡ’ ϩⲛ ⲟⲩⲛⲟⲩϩⲃ ⲛⲧⲟⲥ̣ <text:line-break/><text:span text:style-name="T1"> </text:span><text:span text:style-name="T2">(30/2) </text:span> ⲛ [.....]..ⲥ· ⲛϩⲣⲁⲓ̈ ϩⲛ ⲟⲩ〈ⲟⲩ〉ⲟ[ⲉ]ⲓ̣ⲛ ⲛ̣ <text:line-break/><text:span text:style-name="T1"> </text:span><text:span text:style-name="T2">(30/3) </text:span> ⲛ[....]ⲛ ⲙⲛ ⲟⲩⲙⲉⲉⲩⲉ ⲛϩⲣⲁ̣ⲓ̈ ϩⲛ <text:line-break/><text:span text:style-name="T1"> </text:span><text:span text:style-name="T2">(30/4) </text:span> ⲟ[ⲩ... ⲛ]ⲧ̣ⲁϥ· ⲁ̅ⲇ̅ⲁ̅ⲙ̅ⲁ̅ⲥ̅ ⲇⲉ ⲡ[ⲓ]ⲧⲉ[ⲗⲓ]‐ <text:line-break/><text:span text:style-name="T1"> </text:span><text:span text:style-name="T2">(30/5) </text:span> ⲟ[ⲥ] ⲛ ⲣⲱⲙⲉ̣ ⲉ̣ⲩⲃⲁⲗ ⲡⲉ̣ ⲛⲧⲉ̣ ⲡ̣ⲓ̣ⲁ̣ⲩ̣[ⲧ]ⲟ̣‐ <text:line-break/><text:span text:style-name="T1"> </text:span><text:span text:style-name="T2">(30/6) </text:span> ⲅⲉⲛⲏⲥ· ⲟⲩⲅⲛⲱⲥⲓⲥ ⲛ̣̅ⲧⲁϥ ⲡⲉ̣ ⲉϥⲉⲗϥ <text:line-break/><text:span text:style-name="T1"> </text:span><text:span text:style-name="T2">(30/7) </text:span> ϫⲉ ⲡⲓⲁⲩⲧⲟⲅ[ⲉ]ⲛ̣ⲏⲥ ⲛ̅ ⲛⲟⲩⲧⲉ ⲟⲩ‐ <text:line-break/><text:span text:style-name="T1"> </text:span><text:span text:style-name="T2">(30/8) </text:span> ϣⲁϫⲉ ⲡⲉ̣ ⲛⲧⲉ [ⲡ]ⲓⲛⲟ̣ⲩⲥ ⲛ ⲧ̣ⲉ[ⲗ]ⲓ̣ⲟⲥ <text:line-break/><text:span text:style-name="T1"> </text:span><text:span text:style-name="T2">(30/9) </text:span> ⲛⲧⲉ ϯⲙⲛⲧⲙ̣ⲉ· ⲡⲓϣⲏⲣⲉ ⲇⲉ ⲛⲧⲉ <text:line-break/><text:span text:style-name="T1"> </text:span><text:span text:style-name="T2">(30/10) </text:span> §ⲁ̅ⲇ̅ⲁ̅ⲙ̅ⲁ̅ⲛ̅ ⲥ̅ⲏⲑ̅ ⲉϥ̣ⲛⲛⲏⲩ ⲉϩⲣⲁⲓ̈ ⲉ ⲧⲟⲩ‐ <text:line-break/><text:span text:style-name="T1"> </text:span><text:span text:style-name="T2">(30/11) </text:span> ⲉⲓ ⲧⲟⲩⲉⲓ ⲛⲧⲉ ⲛⲓ̣ⲯ̣ⲩⲭⲏ· ⲉⲩ[ⲅ]ⲛⲱⲥⲓⲥ <text:line-break/><text:span text:style-name="T1"> </text:span><text:span text:style-name="T2">(30/12) </text:span> ⲡⲉ ⲉϥⲣⲱϣⲉ ⲉ ⲛⲁⲓ̈· ⲁⲩⲱ ⲉⲧ̣ⲃⲉ ⲡⲁⲓ̈ <text:line-break/><text:span text:style-name="T1"> </text:span><text:span text:style-name="T2">(30/13) </text:span> ⲁⲥϣⲱⲡⲉ ⲉⲃⲟⲗ ⲙⲙⲟϥ ⲛϭⲓ [ϯⲥⲡ]ⲟⲣⲁ <text:line-break/><text:span text:style-name="T1"> </text:span><text:span text:style-name="T2">(30/14) </text:span> ⲉⲧⲟⲛϩ̣· ʹ264ʹ264 ⲙ̅ⲕ̅ⲣ̅ⲟ̅ⲑ̅ⲉ̅ⲁ̅ ⲇ[ⲉ] ⲧⲉ̣ [...] ⲧ[ <text:line-break/><text:span text:style-name="T1"> </text:span><text:span text:style-name="T2">(30/15) </text:span> ⲡⲓⲁⲩⲧⲟⲅⲉⲛⲏⲥ ⲛ [ⲛⲟ]ⲩⲧⲉ ⲟ[ⲩ.. <text:line-break/><text:span text:style-name="T1"> </text:span><text:span text:style-name="T2">(30/16) </text:span> ⲉⲃⲟⲗ ⲛϩⲏⲧⲥ ⲙⲛ .̅.̅[....] ⲉⲩ̣[ⲙ]ⲉⲉⲩ[ⲉ <text:line-break/><text:span text:style-name="T1"> </text:span><text:span text:style-name="T2">(30/17) </text:span> ⲇⲉ ⲛⲧⲉ ⲡⲓⲛⲟⲩ[ⲥ ⲛ] ⲧ̣ⲉⲗⲓⲟⲥ ⲉⲧⲃⲉ <text:line-break/><text:span text:style-name="T1"> </text:span><text:span text:style-name="T2">(30/18) </text:span> ⲧⲉⲧⲉ ⲧⲱⲥ ⲛ ϩⲩ[ⲡⲁⲣⲝ]ⲓ̣ⲥ ϫ[ⲉ] ⲟ̣ⲩ ⲧⲉ <text:line-break/><text:span text:style-name="T1"> </text:span><text:span text:style-name="T2">(30/19) </text:span> ⲏ%0 ϫⲉ̣ ⲛⲉⲥϣⲟⲟⲡ’ [.. ⲛⲁ]ϣ ⲛ ⲣⲏⲧⲉ <text:line-break/><text:span text:style-name="T1"> </text:span><text:span text:style-name="T2">(30/20) </text:span> ⲁⲩⲱ ϫⲉ ⲥϣⲟ̣[ⲟⲡ’] ⲉⲧⲃⲉ ⲡⲁⲓ̈ ⲙⲉⲛ <text:line-break/><text:span text:style-name="T1"> </text:span><text:span text:style-name="T2">(30/21) </text:span> ⲡⲓⲁⲩⲧⲟⲅⲉⲛ[ⲏ]ⲥ̣ ⲛ ⲛⲟⲩⲧⲉ ⲟⲩϣⲁ‐ <text:line-break/><text:span text:style-name="T1"> </text:span><text:span text:style-name="T2">(30/22) </text:span> ϫⲉ ⲡⲉ ⲙⲛ ⲟⲩ[ⲅ]ⲛ̣ⲱ̣ⲥ̣ⲓⲥ· ⲁⲩⲱ̣ ϯ̣‐ <text:line-break/><text:span text:style-name="T1"> </text:span><text:span text:style-name="T2">(30/23) </text:span> ⲅⲛⲱⲥⲓⲥ ⲙⲉⲛ [ ϣⲁ]‐ <text:line-break/><text:span text:style-name="T1"> </text:span><text:span text:style-name="T2">(30/24) </text:span> ϫⲉ· ⲉⲧⲃ[ⲉ] ⲡ̣ⲁⲓ̈ .[......... <text:line-break/><text:span text:style-name="T1"> </text:span><text:span text:style-name="T2">(30/25) </text:span> ⲁ̅ⲇ̅ⲁ̅ⲙ̅ⲁ̅[...]ⲡⲗ[....].[...]ⲙⲁ̣[ <text:line-break/><text:span text:style-name="T1"> </text:span><text:span text:style-name="T2">(30/26) </text:span> ⲧⲉ ⲛⲓ[ϩⲁ]ⲡ̣ⲗⲟ̣[ⲩⲛ] ⲉⲧⲁⲥⲟⲩⲱⲛ[ϩ] <text:line-break/><text:span text:style-name="T1"> </text:span><text:span text:style-name="T2">(30/27) </text:span> ⲉⲃⲟ̣[ⲗ.......ⲟⲩ]ϣⲓⲃⲉ ⲛⲧⲉ ⲛ[ⲓ]‐ <text:line-break/><text:span text:style-name="T1"> </text:span><text:span text:style-name="T2">(30/28) </text:span> ⲯⲩ[ⲭⲏ.......]ⲉ ϩⲱⲱⲥ ⲧⲉ̣[.].̅[ <text:line-break/><text:span text:style-name="T1"> </text:span><text:span text:style-name="T2">(30/29) </text:span> ⲧⲉ̣[........ⲧ]ⲉⲗⲓⲟⲥ· ⲉⲧⲃⲉ ⲛ[ⲓ]‐ <text:line-break/><text:span text:style-name="T1"> </text:span><text:span text:style-name="T2">(30/30) </text:span> ⲧⲉ̣[ⲗⲓⲟⲥ ...] ⲛⲓⲙⲛⲧ’ⲁⲅⲅⲉⲗⲟⲥ <text:line-break/><text:span text:style-name="T1"> </text:span><text:span text:style-name="T2">(31/1) </text:span> [....]ϣⲉⲛⲥⲟ̣[......... <text:line-break/><text:span text:style-name="T1"> </text:span><text:span text:style-name="T2">(31/2) </text:span> [...]ⲱⲡⲉ ⲟⲩⲛ[........ <text:line-break/><text:span text:style-name="T1"> </text:span><text:span text:style-name="T2">(31/3) </text:span> [.ⲯ]ⲩⲭⲏ ⲛ̣ⲛ[......... <text:line-break/><text:soft-page-break/><text:span text:style-name="T1"> </text:span><text:span text:style-name="T2">(31/4) </text:span> [....]ⲙⲟⲩ ⲁⲩ[........ <text:line-break/><text:span text:style-name="T1"> </text:span><text:span text:style-name="T2">(31/5) </text:span> [.......].ⲡⲓ[..]ⲙⲟⲥ ⲛⲛ <text:line-break/><text:span text:style-name="T1"> </text:span><text:span text:style-name="T2">(31/6) </text:span> [.........]ⲛ. [ⲛⲓⲁⲛ]ⲧⲓⲧⲩⲡⲟⲥ <text:line-break/><text:span text:style-name="T1"> </text:span><text:span text:style-name="T2">(31/7) </text:span> [ ⲟ]ⲛ̣ⲧⲱⲥ <text:line-break/><text:span text:style-name="T1"> </text:span><text:span text:style-name="T2">(31/8) </text:span> [..........]ⲟⲡ̣[..]ⲥ̣ⲓⲥ ⲉⲧ’ϣⲟ‐ <text:line-break/><text:span text:style-name="T1"> </text:span><text:span text:style-name="T2">(31/9) </text:span> [........]ⲛ ϯⲙⲉⲧⲁⲛⲟⲓⲁ <text:line-break/><text:span text:style-name="T1"> </text:span><text:span text:style-name="T2">(31/10) </text:span> [........]ⲁⲓ̈ ⲉ ⲡⲉⲓ̈ⲙⲁ ⲉϩⲣⲁⲓ̈ <text:line-break/><text:span text:style-name="T1"> </text:span><text:span text:style-name="T2">(31/11) </text:span> [......].ⲉⲧ’ϣⲟⲟⲡ’ ⲛ ⲁⲩ‐ <text:line-break/><text:span text:style-name="T1"> </text:span><text:span text:style-name="T2">(31/12) </text:span> [......] ⲛⲛ ⲉⲱⲛ· ⲉϣⲱⲡⲉ <text:line-break/><text:span text:style-name="T1"> </text:span><text:span text:style-name="T2">(31/13) </text:span> [........]ⲛⲉ ⲁⲩⲱ ⲉⲥⲣ ⲁⲅ̣[ⲁ]ⲡⲁⲛ <text:line-break/><text:span text:style-name="T1"> </text:span><text:span text:style-name="T2">(31/14) </text:span> [.......] ⲉ̣ⲥ̣ⲁϩⲉⲣⲁⲧⲥ ϩⲓϫⲛ <text:line-break/><text:span text:style-name="T1"> </text:span><text:span text:style-name="T2">(31/15) </text:span> [.]ⲙⲉ[.....] ⲛⲛ ⲉⲱⲛ ⲉⲩⲛ‐ <text:line-break/><text:span text:style-name="T1"> </text:span><text:span text:style-name="T2">(31/16) </text:span> [ⲧⲁⲥ] ⲙⲙ[ⲁⲩ ⲙ] ⲡ̣ⲓⲫⲱⲥⲧⲏⲣ ⲏʹ265 <text:line-break/><text:span text:style-name="T1"> </text:span><text:span text:style-name="T2">(31/17) </text:span> [ⲗ̅ⲏ̅]ⲗ̅ⲏ̅ⲑ̅ [....]ϣⲱⲡⲉ ⲛ ⲟⲩⲁⲛ <text:line-break/><text:span text:style-name="T1"> </text:span><text:span text:style-name="T2">(31/18) </text:span> [...]ⲣⲉϥⲛⲁ[ⲩ ⲉ ⲛ]ⲟⲩⲧⲉ· ⲉϣ̣ⲱ‐ <text:line-break/><text:span text:style-name="T1"> </text:span><text:span text:style-name="T2">(31/19) </text:span> [ⲡⲉ ⲇ]ⲉ ⲉⲥⲣ ϩⲉⲗ̣[ⲡⲓ]ⲥ ⲁⲩⲱ ⲉⲥⲉⲓ‐ <text:line-break/><text:span text:style-name="T1"> </text:span><text:span text:style-name="T2">(31/20) </text:span> ⲱⲣϩ· ⲟⲩⲁ[.....]ⲥ ⲇⲉ ⲛ ⲅⲉⲛⲟⲥ <text:line-break/><text:span text:style-name="T1"> </text:span><text:span text:style-name="T2">(31/21) </text:span> [ ⲁϩ]ⲉⲣⲁⲧⲥ ϩⲓϫⲛ <text:line-break/><text:span text:style-name="T1"> </text:span><text:span text:style-name="T2">(31/22) </text:span> [ ]ⲧⲁⲥ ⲙⲙⲁⲩ <text:line-break/><text:span text:style-name="T1"> </text:span><text:span text:style-name="T2">(31/23) </text:span> [ ]ⲑ̣‐· ⲉϣⲱ <text:line-break/><text:span text:style-name="T1"> </text:span><text:span text:style-name="T2">(31/24) </text:span> [ⲡⲉ ]ⲟⲥ ϩⲱ <text:line-break/><text:span text:style-name="T1"> </text:span><text:span text:style-name="T2">(31/25) </text:span> [ ]ϣ̣ⲁⲥ <text:line-break/><text:span text:style-name="T1"> </text:span><text:span text:style-name="T2">(31/26) </text:span> [ ]ⲟⲩ <text:line-break/><text:span text:style-name="T1"> </text:span><text:span text:style-name="T2">(31/27) </text:span> [ ]. <text:line-break/><text:span text:style-name="T1"> </text:span><text:span text:style-name="T2">(31/28) </text:span> [ ]. <text:line-break/><text:span text:style-name="T1"> </text:span><text:span text:style-name="T2">(31/29) </text:span> [ ]ⲁⲩ <text:line-break/><text:span text:style-name="T1"> </text:span><text:span text:style-name="T2">(32/1) </text:span> [.........]ⲥ̣ϩⲟⲧⲡ’ ⲙ[.... <text:line-break/><text:span text:style-name="T1"> </text:span><text:span text:style-name="T2">(32/2) </text:span> [.........]ⲉ̣ⲥⲁϩⲉⲣⲁⲧ̣[ⲥ.. <text:line-break/><text:span text:style-name="T1"> </text:span><text:span text:style-name="T2">(32/3) </text:span> [ ]ⲣⲡ’ ⲛⲛ [... <text:line-break/><text:span text:style-name="T1"> </text:span><text:span text:style-name="T2">(32/4) </text:span> [.........]ⲁ̣ⲩ ⲙ ⲡⲓⲫ[ⲱⲥ]‐ <text:line-break/><text:span text:style-name="T1"> </text:span><text:span text:style-name="T2">(32/5) </text:span> ⲧⲏⲣ ⲁ̅ⲣ̅[̅ⲙ̅ⲟ̅ⲍ̅ⲏ̅ⲗ̅ <text:line-break/><text:span text:style-name="T1"> </text:span><text:span text:style-name="T2">(32/6) </text:span> ⲡⲉ ⲛ ⲟⲩⲁ[ <text:line-break/><text:span text:style-name="T1"> </text:span><text:span text:style-name="T2">(32/7) </text:span> §ⲥⲙⲟ[.].[ <text:line-break/><text:span text:style-name="T1"> </text:span><text:span text:style-name="T2">(32/8) </text:span> ⲉϩⲣⲁⲓ̈ ⲉ̣ϫ̣[ⲛ] ϯϭ[ⲟⲙ ....... <text:line-break/><text:span text:style-name="T1"> </text:span><text:span text:style-name="T2">(32/9) </text:span> ⲁϩⲉⲣⲁⲧⲕ ϩⲓϫ[ⲛ <text:line-break/><text:span text:style-name="T1"> </text:span><text:span text:style-name="T2">(32/10) </text:span> ⲡⲓⲟⲩⲟⲉⲓⲛ ⲉⲧ̣[......... <text:line-break/><text:span text:style-name="T1"> </text:span><text:span text:style-name="T2">(32/11) </text:span> ⲁⲩⲱ ⲛ ⲁⲧ’ϯ ϣ̣[ⲓ] ⲉⲣ[ⲟ%1...... <text:line-break/><text:span text:style-name="T1"> </text:span><text:span text:style-name="T2">(32/12) </text:span> ⲛⲟϭ ⲡⲉ ⲡⲓⲁⲓ̣ⲱ̣ⲛ· ⲁ[...... <text:line-break/><text:span text:style-name="T1"> </text:span><text:span text:style-name="T2">(32/13) </text:span> ⲧⲁ[..] ⲛ ⲛⲏ ⲙⲁⲩⲁⲁⲩ̣ [...... <text:line-break/><text:span text:style-name="T1"> </text:span><text:span text:style-name="T2">(32/14) </text:span> ⲃⲟⲗ ϩⲙ ⲡⲓⲧⲉⲗⲓⲟ̣[ⲥ ........ <text:line-break/><text:span text:style-name="T1"> </text:span><text:span text:style-name="T2">(32/15) </text:span> ϭⲟⲙ ⲉⲧⲙⲙⲁⲩ̣ [....]ⲧ̣ⲉ.[.. <text:line-break/><text:span text:style-name="T1"> </text:span><text:span text:style-name="T2">(32/16) </text:span> ϣϭⲟⲙ· ⲏ%0 ⲙⲙ[...]ϣ̣ⲱ[... <text:line-break/><text:span text:style-name="T1"> </text:span><text:span text:style-name="T2">(32/17) </text:span> ϣϭⲟⲙ ⲛⲧⲉ ⲟⲩ[....]ⲟⲛ[... <text:line-break/><text:span text:style-name="T1"> </text:span><text:span text:style-name="T2">(32/18) </text:span> ⲛ[ⲓ]ⲙ ⲛⲧⲉ ⲧⲉϥⲯ̣[ⲩ]ⲭⲏ .ⲛ ⲁ[.... <text:line-break/><text:span text:style-name="T1"> </text:span><text:span text:style-name="T2">(32/19) </text:span> [ⲉ]ⲥ̣ⲑⲏⲧⲟⲛ [...]ⲁ̣ⲁϥ ⲁⲛ ⲙⲛ [... <text:line-break/><text:span text:style-name="T1"> </text:span><text:span text:style-name="T2">(32/20) </text:span> ⲑⲙⲓⲕⲟⲛ· ⲁⲗ[ⲗⲁ .]ⲕⲉⲁⲧ’ ϫⲟ̣[.. <text:line-break/><text:span text:style-name="T1"> </text:span><text:span text:style-name="T2">(32/21) </text:span> ⲛ ⲕⲁⲧⲁ ⲟⲩⲁ̣ [.....].ⲥ[..]ⲁ .[.. <text:line-break/><text:soft-page-break/><text:span text:style-name="T1"> </text:span><text:span text:style-name="T2">(32/22) </text:span> ⲉⲙⲛ ⲗⲁⲁⲩ [.........].[.. <text:line-break/><text:span text:style-name="T1"> </text:span><text:span text:style-name="T2">(32/23) </text:span> ⲙⲙⲟϥ· [ <text:line-break/><text:span text:style-name="T1"> </text:span><text:span text:style-name="T2">(32/24) </text:span> ⲉⲧϥ[ <text:line-break/><text:span text:style-name="T1"> </text:span><text:span text:style-name="T2">(32/25) </text:span> ⲙ ⲟⲛ̣[ <text:line-break/><text:span text:style-name="T1"> </text:span><text:span text:style-name="T2">(32/26) </text:span> ⲁⲩ[ <text:line-break/><text:span text:style-name="T1"> </text:span><text:span text:style-name="T2">(32/27) </text:span> ⲥ[ <text:line-break/><text:span text:style-name="T1"> </text:span><text:span text:style-name="T2">(32/28) </text:span> ϩ[ⲛ <text:line-break/><text:span text:style-name="T1"> </text:span><text:span text:style-name="T2">(32/29) </text:span> [ <text:line-break/><text:span text:style-name="T1"> </text:span><text:span text:style-name="T2">(33/1) </text:span> ⲁⲩⲱ ⲛⲛ ⲁⲧⲥⲱ̣[.......ϩ]ⲓ‐ <text:line-break/><text:span text:style-name="T1"> </text:span><text:span text:style-name="T2">(33/2) </text:span> [ϫ]ⲛ ⲟ̣ⲩⲟⲛ ⲛⲓⲙ [ ]ⲛ <text:line-break/><text:span text:style-name="T1"> </text:span><text:span text:style-name="T2">(33/3) </text:span> [...]ⲛ ⲛⲓⲙ [.]ⲁ[ ]ⲥⲡⲉ <text:line-break/><text:span text:style-name="T1"> </text:span><text:span text:style-name="T2">(33/4) </text:span> [....]ⲧ’ⲙⲟ̣ⲣ̣ⲫⲏ [.......]..[.] ⲙ <text:line-break/><text:span text:style-name="T1"> </text:span><text:span text:style-name="T2">(33/5) </text:span> [........] ⲛⲛ ⲁ[....]ⲓ̣ⲟ ⲙⲛ ⲡⲁⲓ̈ <text:line-break/><text:span text:style-name="T1"> </text:span><text:span text:style-name="T2">(33/6) </text:span> [..........]ⲧ’ [....]ⲁ̣ ⲙⲛ ⲡⲉⲓ̈ⲧⲩ‐ <text:line-break/><text:span text:style-name="T1"> </text:span><text:span text:style-name="T2">(33/7) </text:span> [ⲡⲟⲥ...ⲙ]ⲛ ⲗⲁⲁⲩ ⲛ <text:line-break/><text:span text:style-name="T1"> </text:span><text:span text:style-name="T2">(33/8) </text:span> [ ϣⲁ ⲉ]ⲛⲉϩ· ⲟⲩⲧⲉ <text:line-break/><text:span text:style-name="T1"> </text:span><text:span text:style-name="T2">(33/9) </text:span> [ ]ⲉ̣ⲧⲉ ⲟⲩⲧⲏⲣϥ ⲉ <text:line-break/><text:span text:style-name="T1"> </text:span><text:span text:style-name="T2">(33/10) </text:span> [ ]. ⲁ̣ⲧⲱϫⲛ ⲙ ⲡ̣ⲉⲉⲓ‐ <text:line-break/><text:span text:style-name="T1"> </text:span><text:span text:style-name="T2">(33/11) </text:span> [ ]ⲙ ⲉϥⲁⲥⲓⲏⲟⲩⲧ’ <text:line-break/><text:span text:style-name="T1"> </text:span><text:span text:style-name="T2">(33/12) </text:span> [ ]ⲡ̣ⲓⲧⲉⲗⲓⲟ[ⲥ] ⲛ ⲛⲟⲩⲥ· <text:line-break/><text:span text:style-name="T1"> </text:span><text:span text:style-name="T2">(33/13) </text:span> [ ]ⲉ ⲛⲛ ⲁⲧ’ⲡⲱϣ <text:line-break/><text:span text:style-name="T1"> </text:span><text:span text:style-name="T2">(33/14) </text:span> [ ⲟⲩ]ⲟ̣ⲉⲓⲛ ⲛ ⲧⲉⲗⲓⲟⲥ ⲛ <text:line-break/><text:span text:style-name="T1"> </text:span><text:span text:style-name="T2">(33/15) </text:span> [ ]ϥϣⲟⲟⲡ’ ⲇⲉ ϩⲙ <text:line-break/><text:span text:style-name="T1"> </text:span><text:span text:style-name="T2">(33/16) </text:span> [ ⲁ]ⲇ̣ⲁ̣ⲙⲁⲥ· ⲁⲩⲱ <text:line-break/><text:span text:style-name="T1"> </text:span><text:span text:style-name="T2">(33/17) </text:span> [ ⲡ]ⲓⲁⲩⲧⲟⲅ̣ⲉ‐ <text:line-break/><text:span text:style-name="T1"> </text:span><text:span text:style-name="T2">(33/18) </text:span> [ⲛⲏⲥ ⲁ]ⲩ̣ⲱ ϣⲁϥⲃⲱⲕ <text:line-break/><text:span text:style-name="T1"> </text:span><text:span text:style-name="T2">(33/19) </text:span> [ ⲧⲉⲗⲓ]ⲟ̣ⲥ ⲛ ⲛⲟⲩⲥ <text:line-break/><text:span text:style-name="T1"> </text:span><text:span text:style-name="T2">(33/20) </text:span> [ ] ⲡⲓⲕ̅ⲗ̅ⲥ̅ ⲛ ⲛⲟⲩ‐ <text:line-break/><text:span text:style-name="T1"> </text:span><text:span text:style-name="T2">(33/21) </text:span> [ ]ⲡ’ ⲛ ⲉⲓⲙⲉ <text:line-break/><text:span text:style-name="T1"> </text:span><text:span text:style-name="T2">(33/22) </text:span> [ ]ⲙ· ⲁⲗⲗⲁ <text:line-break/><text:span text:style-name="T1"> </text:span><text:span text:style-name="T2">(33/23) </text:span> [ ⲯⲩ]ⲭ̣ⲏ ⲉ <text:line-break/><text:span text:style-name="T1"> </text:span><text:span text:style-name="T2">(33/24) </text:span> [ ]ⲙⲁⲩ <text:line-break/><text:span text:style-name="T1"> </text:span><text:span text:style-name="T2">(33/25) </text:span> [ ]ⲱ <text:line-break/><text:span text:style-name="T1"> </text:span><text:span text:style-name="T2">(33/26) </text:span> [ ]ⲛϩ <text:line-break/><text:span text:style-name="T1"> </text:span><text:span text:style-name="T2">(33/27) </text:span> [ ] <text:line-break/><text:span text:style-name="T1"> </text:span><text:span text:style-name="T2">(33/28) </text:span> [ ]ⲥ <text:line-break/><text:span text:style-name="T1"> </text:span><text:span text:style-name="T2">(34/1) </text:span> .[.........] ⲛ ϩⲩⲡⲁⲣⲝⲓⲥ <text:line-break/><text:span text:style-name="T1"> </text:span><text:span text:style-name="T2">(34/2) </text:span> [........ ⲉ]ⲃⲟⲗ ⲉⲥⲛⲧ̣ⲁ̣ⲩ <text:line-break/><text:span text:style-name="T1"> </text:span><text:span text:style-name="T2">(34/3) </text:span> [..........].[.]ⲩ̣ⲛⲉ̣[... <text:line-break/><text:span text:style-name="T1"> </text:span><text:span text:style-name="T2">(34/4) </text:span> .[.........] ϩⲉ̣ⲛ̣ⲙⲉϩⲃ̣̅ [ⲛ] <text:line-break/><text:span text:style-name="T1"> </text:span><text:span text:style-name="T2">(34/5) </text:span> [ϭⲟ]ⲙ ⲙⲛ [...] ⲡⲁ[ <text:line-break/><text:span text:style-name="T1"> </text:span><text:span text:style-name="T2">(34/6) </text:span> ⲙⲉϩⲅ̅ ⲇⲉ̣ [..]ⲉⲛ[ <text:line-break/><text:span text:style-name="T1"> </text:span><text:span text:style-name="T2">(34/7) </text:span> ⲱⲛϩ ⲉⲃⲟⲗ̣ [ <text:line-break/><text:span text:style-name="T1"> </text:span><text:span text:style-name="T2">(34/8) </text:span> ⲉⲧⲉ ⲛ[ <text:line-break/><text:span text:style-name="T1"> </text:span><text:span text:style-name="T2">(34/9) </text:span> ⲟⲩ ⲛ ⲟⲩ[ <text:line-break/><text:span text:style-name="T1"> </text:span><text:span text:style-name="T2">(34/10) </text:span> ϩⲉ ⲛ ⲯⲩⲭⲏ· ⲁ[......... <text:line-break/><text:span text:style-name="T1"> </text:span><text:span text:style-name="T2">(34/11) </text:span> ϭⲉ ⲛⲓⲁⲓⲱⲛ ⲇ̣ⲉ̣ [......... <text:line-break/><text:soft-page-break/><text:span text:style-name="T1"> </text:span><text:span text:style-name="T2">(34/12) </text:span> ⲙⲁ ⲛ ϣⲱⲡⲉ .[......... <text:line-break/><text:span text:style-name="T1"> </text:span><text:span text:style-name="T2">(34/13) </text:span> ⲯⲩⲭ̣ⲏ ⲙⲛ ϩⲉⲛ̣[......... <text:line-break/><text:span text:style-name="T1"> </text:span><text:span text:style-name="T2">(34/14) </text:span> ϩ[ⲉ]ⲛ̣[ⲛ]ⲟⲩⲧⲉ ⲛ[......... <text:line-break/><text:span text:style-name="T1"> </text:span><text:span text:style-name="T2">(34/15) </text:span> ϫⲟⲥⲉ ⲉ ⲛⲟⲩⲧⲉ̣ [........ <text:line-break/><text:span text:style-name="T1"> </text:span><text:span text:style-name="T2">(34/16) </text:span> ⲛⲧⲉ ⲛⲓⲁⲩⲧⲟ[ⲅⲉⲛⲏⲥ .... <text:line-break/><text:span text:style-name="T1"> </text:span><text:span text:style-name="T2">(34/17) </text:span> ⲙⲙⲁⲩ ⲙ ⲡⲓⲁⲩ̣[ⲧⲟⲅⲉⲛⲏⲥ .. <text:line-break/><text:span text:style-name="T1"> </text:span><text:span text:style-name="T2">(34/18) </text:span> ⲛ ϣⲟⲣⲡ’ ⲛ ⲛⲟⲩ̣[......... <text:line-break/><text:span text:style-name="T1"> </text:span><text:span text:style-name="T2">(34/19) </text:span> ⲛ ⲁ̣ⲅⲅⲉⲗ[ⲟ]ⲥ̣ [ <text:line-break/><text:span text:style-name="T1"> </text:span><text:span text:style-name="T2">(34/20) </text:span> ⲛ̣ ⲁϩⲟⲣⲁⲧⲟ̣[ⲛ <text:line-break/><text:span text:style-name="T1"> </text:span><text:span text:style-name="T2">(34/21) </text:span> ⲉⲃⲟⲗ ⲛ ϩⲉⲛ[ <text:line-break/><text:span text:style-name="T1"> </text:span><text:span text:style-name="T2">(34/22) </text:span> ⲯⲩⲭⲏ ⲙⲛ [ <text:line-break/><text:span text:style-name="T1"> </text:span><text:span text:style-name="T2">(34/23) </text:span> ⲛⲛ ⲉⲱⲛ .[ <text:line-break/><text:span text:style-name="T1"> </text:span><text:span text:style-name="T2">(34/24) </text:span> ⲇⲉ ⲉ ϯⲯ[ⲩⲭⲏ <text:line-break/><text:span text:style-name="T1"> </text:span><text:span text:style-name="T2">(34/25) </text:span> ⲁⲅⲅⲉⲗ̣[ⲟⲥ <text:line-break/><text:span text:style-name="T1"> </text:span><text:span text:style-name="T2">(34/26) </text:span> ⲭⲏ ⲙ̣[ <text:line-break/><text:span text:style-name="T1"> </text:span><text:span text:style-name="T2">(34/27) </text:span> ⲅⲉ[ <text:line-break/><text:span text:style-name="T1"> </text:span><text:span text:style-name="T2">(34/28) </text:span> ⲱ̣[ <text:line-break/><text:span text:style-name="T1"> </text:span><text:span text:style-name="T2">(34/29) </text:span> ⲇ[ <text:line-break/><text:span text:style-name="T1"> </text:span><text:span text:style-name="T2">(34/30) </text:span> ⲉ̣[ <text:line-break/><text:span text:style-name="T1"> </text:span><text:span text:style-name="T2">(35/1) </text:span> ⲧ̣ⲁ̣ⲥ ⲙⲙⲁⲩ ⲛ [ ].ⲉ <text:line-break/><text:span text:style-name="T1"> </text:span><text:span text:style-name="T2">(35/2) </text:span> [.]ⲁ̣ⲓ̈ ϣⲁ ⲉ̣ⲛ[ⲉϩ........]ⲉ ⲛ <text:line-break/><text:span text:style-name="T1"> </text:span><text:span text:style-name="T2">(35/3) </text:span> [ⲥ]ⲟⲡ·ʹ264ʹ264 ⲁⲩ̣ⲱ [ ]ⲁ̣ⲏⲏ <text:line-break/><text:span text:style-name="T1"> </text:span><text:span text:style-name="T2">(35/4) </text:span> [..]ⲉ [.....]ϣⲁ̣[....]ⲁ̣ⲧⲥ· ⲉϣⲱ‐ <text:line-break/><text:span text:style-name="T1"> </text:span><text:span text:style-name="T2">(35/5) </text:span> ⲡⲉ ⲇ̣[ⲉ ....]ⲁ̣ⲛ.[...] ⲛϭⲓ ⲟⲩⲯⲩⲭⲏ <text:line-break/><text:span text:style-name="T1"> </text:span><text:span text:style-name="T2">(35/6) </text:span> ⲡ̣ⲁ.[........ ϣ]ⲱ̣ⲡⲉ ⲛ ⲟⲩ‐ <text:line-break/><text:span text:style-name="T1"> </text:span><text:span text:style-name="T2">(35/7) </text:span> ⲁⲅ’[ⲅⲉⲗⲟⲥ...]ⲉ̣ ⲇⲉ ⲛ ⲕⲟⲥ‐ <text:line-break/><text:span text:style-name="T1"> </text:span><text:span text:style-name="T2">(35/8) </text:span> ⲙ̣ⲟ̣ⲥ̣ [.... ⲛⲓⲁⲅ’]ⲅⲉ̣ⲗⲟ̣ⲥ ⲁⲩⲱ ⲛⲓ‐ <text:line-break/><text:span text:style-name="T1"> </text:span><text:span text:style-name="T2">(35/9) </text:span> [ ⲧ]ⲏ ⲉⲧⲟⲩⲁⲁⲃ ⲥⲥⲟ‐ <text:line-break/><text:span text:style-name="T1"> </text:span><text:span text:style-name="T2">(35/10) </text:span> [ ]ⲁ̣ⲓⲱⲛ ⲇⲉ ⲉⲧ’ⲥⲁ <text:line-break/><text:span text:style-name="T1"> </text:span><text:span text:style-name="T2">(35/11) </text:span> [ ⲁⲩⲧⲟⲅ]ⲉⲛⲏⲥ ⲟⲩⲛⲧⲉ <text:line-break/><text:span text:style-name="T1"> </text:span><text:span text:style-name="T2">(35/12) </text:span> [ ]ⲙⲟⲟⲩ ⲡ[....]ⲩ <text:line-break/><text:span text:style-name="T1"> </text:span><text:span text:style-name="T2">(35/13) </text:span> [ ]ⲧⲉ ⲛ ⲁⲣⲭⲱⲛ· <text:line-break/><text:span text:style-name="T1"> </text:span><text:span text:style-name="T2">(35/14) </text:span> [ ] ⲉⲩⲛⲧⲁⲩ ⲙⲙⲁⲩ <text:line-break/><text:span text:style-name="T1"> </text:span><text:span text:style-name="T2">(35/15) </text:span> [ ⲇⲓⲁ]ⲫⲟⲣⲁ· ⲉⲧⲉ ⲉⲧⲃⲏ <text:line-break/><text:span text:style-name="T1"> </text:span><text:span text:style-name="T2">(35/16) </text:span> [ⲏⲧ‐ ] ⲧⲁⲓ̈ ⲁⲛ ⲧⲉ ⲉϣⲁϫⲉ <text:line-break/><text:span text:style-name="T1"> </text:span><text:span text:style-name="T2">(35/17) </text:span> [ ]. ⲛ̣ϩⲟⲟⲩ[.].ⲉ <text:line-break/><text:span text:style-name="T1"> </text:span><text:span text:style-name="T2">(35/18) </text:span> [ ]ⲣⲁϥ· ⲙⲛ <text:line-break/><text:span text:style-name="T1"> </text:span><text:span text:style-name="T2">(35/19) </text:span> [ ⲁⲩⲧⲟⲅⲉⲛ]ⲏⲥ ⲛ ⲛⲟⲩⲧⲉ <text:line-break/><text:span text:style-name="T1"> </text:span><text:span text:style-name="T2">(35/20) </text:span> [ ]ⲉⲧ’ϣⲟⲟⲡ’ <text:line-break/><text:span text:style-name="T1"> </text:span><text:span text:style-name="T2">(35/21) </text:span> [ ]ⲥⲱⲧⲙ <text:line-break/><text:span text:style-name="T1"> </text:span><text:span text:style-name="T2">(35/22) </text:span> [ ⲁ]ⲩ̣[ⲧ]ⲟ̣ⲅⲉⲛⲏⲥ <text:line-break/><text:span text:style-name="T1"> </text:span><text:span text:style-name="T2">(35/23) </text:span> [ ]ⲉ ⲛⲧⲉ <text:line-break/><text:span text:style-name="T1"> </text:span><text:span text:style-name="T2">(35/24) </text:span> [ ]ⲟⲥ <text:line-break/><text:span text:style-name="T1"> </text:span><text:span text:style-name="T2">(35/25) </text:span> [ ] ⲛ <text:line-break/><text:span text:style-name="T1"> </text:span><text:span text:style-name="T2">(35/26) </text:span> [ ]ⲡ’ <text:line-break/><text:span text:style-name="T1"> </text:span><text:span text:style-name="T2">(35/27) </text:span> [ <text:line-break/><text:span text:style-name="T1"> </text:span><text:span text:style-name="T2">(35/28) </text:span> [ <text:line-break/><text:soft-page-break/><text:span text:style-name="T1"> </text:span><text:span text:style-name="T2">(36/1) </text:span> ⲛ ⲧ.[.......]ⲱⲥ ʹ264ʹ264 ⲟⲩⲛⲧ[ⲁ%1.] <text:line-break/><text:span text:style-name="T1"> </text:span><text:span text:style-name="T2">(36/2) </text:span> [ⲙ]ⲙ̣[ⲁⲩ....]. ⲛ ϯϩⲩⲡ[ⲁ]ⲣⲝ̣[ⲓⲥ] <text:line-break/><text:span text:style-name="T1"> </text:span><text:span text:style-name="T2">(36/3) </text:span> .[.........] ⲛⲛ ⲟⲩⲱⲛϩ [. <text:line-break/><text:span text:style-name="T1"> </text:span><text:span text:style-name="T2">(36/4) </text:span> ⲧ[.......]ϣⲟ[ⲟ]ⲡ’ ⲉⲧⲃ̣ⲉ [.. <text:line-break/><text:span text:style-name="T1"> </text:span><text:span text:style-name="T2">(36/5) </text:span> ϣⲁϫⲉ ⲛ[...]ⲥ ⲛ [.....]..[ <text:line-break/><text:span text:style-name="T1"> </text:span><text:span text:style-name="T2">(36/6) </text:span> ⲡⲓⲁⲗⲟⲩ .[..]ⲟⲟ̣[.....]ϩⲟⲟ[ⲩⲧ’] <text:line-break/><text:span text:style-name="T1"> </text:span><text:span text:style-name="T2">(36/7) </text:span> ⲉⲩϭⲟⲧ’̣ ⲡ̣[ ] ⲛⲏ[. <text:line-break/><text:span text:style-name="T1"> </text:span><text:span text:style-name="T2">(36/8) </text:span> ⲛ ⲛⲟⲩ[ ⲁ]ϩⲟⲣⲁ‐ <text:line-break/><text:span text:style-name="T1"> </text:span><text:span text:style-name="T2">(36/9) </text:span> ⲧⲟⲛ ⲙ ⲡ̅ⲛ̣̅ⲁ̅ ⲁ[........].[.. <text:line-break/><text:span text:style-name="T1"> </text:span><text:span text:style-name="T2">(36/10) </text:span> ϩⲙ ⲡⲓⲧⲉⲗⲓⲟ[ⲥ <text:line-break/><text:span text:style-name="T1"> </text:span><text:span text:style-name="T2">(36/11) </text:span> ⲙⲉⲧⲉⲙⲉⲛ. ⲛ̣ .[ <text:line-break/><text:span text:style-name="T1"> </text:span><text:span text:style-name="T2">(36/12) </text:span> ⲙⲛ ⲟⲩⲁⲣⲭⲏ· .[ <text:line-break/><text:span text:style-name="T1"> </text:span><text:span text:style-name="T2">(36/13) </text:span> ⲛ ⲁ̣[ⲅⲁ]ⲡ̣ⲏ ⲙⲛ ⲟ[ⲩ <text:line-break/><text:span text:style-name="T1"> </text:span><text:span text:style-name="T2">(36/14) </text:span> ⲛⲧⲉ̣ ϯⲃ̅ⲁ̅ⲣ̅ⲃ̅ⲏ̅ⲗ̅[̅ⲱ̅ <text:line-break/><text:span text:style-name="T1"> </text:span><text:span text:style-name="T2">(36/15) </text:span> ⲉⲃⲟⲗ ⲙⲛ ⲟⲩⲙ[ <text:line-break/><text:span text:style-name="T1"> </text:span><text:span text:style-name="T2">(36/16) </text:span> §ⲡⲓⲛⲟⲩⲥ ⲛⲧⲉ [ <text:line-break/><text:span text:style-name="T1"> </text:span><text:span text:style-name="T2">(36/17) </text:span> ⲥⲛⲧⲉ ⲛⲉ ⲛⲁⲓ̈ ⲛ [ <text:line-break/><text:span text:style-name="T1"> </text:span><text:span text:style-name="T2">(36/18) </text:span> ⲡ[ⲓ]ⲙⲉⲉⲩⲉ .[ <text:line-break/><text:span text:style-name="T1"> </text:span><text:span text:style-name="T2">(36/19) </text:span> ⲃⲟ̣ⲗ̣ ϩⲙ ⲡⲓⲟ̣[ <text:line-break/><text:span text:style-name="T1"> </text:span><text:span text:style-name="T2">(36/20) </text:span> ϩⲛ ϯⲃ̅ⲁ̅ⲣ̅ⲃ̅ⲏ̅ⲗ̅[̅ⲱ̅ <text:line-break/><text:span text:style-name="T1"> </text:span><text:span text:style-name="T2">(36/21) </text:span> ⲡⲓⲕ̅ⲗ̅ⲥ̅ ⲇⲉ .[ <text:line-break/><text:span text:style-name="T1"> </text:span><text:span text:style-name="T2">(36/22) </text:span> ⲛⲁⲓ̈ ⲧⲏⲣⲟ[ⲩ <text:line-break/><text:span text:style-name="T1"> </text:span><text:span text:style-name="T2">(36/23) </text:span> ⲙ ⲡⲁⲣⲑⲉ[ⲛⲟⲥ <text:line-break/><text:span text:style-name="T1"> </text:span><text:span text:style-name="T2">(36/24) </text:span> ⲁⲥⲟⲩⲉ̣[ <text:line-break/><text:span text:style-name="T1"> </text:span><text:span text:style-name="T2">(36/25) </text:span> ϩⲛ ⲟⲩ[ <text:line-break/><text:span text:style-name="T1"> </text:span><text:span text:style-name="T2">(36/26) </text:span> ⲙⲛ[ <text:line-break/><text:span text:style-name="T1"> </text:span><text:span text:style-name="T2">(36/27) </text:span> ϫⲡ[ <text:line-break/><text:span text:style-name="T1"> </text:span><text:span text:style-name="T2">(36/28) </text:span> ⲅⲁ[ <text:line-break/><text:span text:style-name="T1"> </text:span><text:span text:style-name="T2">(36/29) </text:span> ⲙ[ <text:line-break/><text:span text:style-name="T1"> </text:span><text:span text:style-name="T2">(37/1) </text:span> ϩⲙ ⲡⲏ ⲉⲧⲙⲙⲁ̣[ⲩ ......]. ⲧϭⲟⲙ <text:line-break/><text:span text:style-name="T1"> </text:span><text:span text:style-name="T2">(37/2) </text:span> [.]ⲉ̣.[.]ⲧⲉ ⲡⲏ̣ ⲉ[........] ⲛⲟⲩ‐ <text:line-break/><text:span text:style-name="T1"> </text:span><text:span text:style-name="T2">(37/3) </text:span> ⲉⲃⲟⲗ̣ ϩⲙ ⲡ[.]ⲉ[....... ⲁⲗ]ⲗⲁ <text:line-break/><text:span text:style-name="T1"> </text:span><text:span text:style-name="T2">(37/4) </text:span> ⲟ̣ⲩⲉ̣ⲃ̣ⲟ̣ⲗ̣ [ϩ]ⲛ̣ ⲧϭⲟ[ⲙ ⲛ]ⲧ̣ⲉ ⲡⲏ [ⲉ]ⲧ̣ⲙ‐ <text:line-break/><text:span text:style-name="T1"> </text:span><text:span text:style-name="T2">(37/5) </text:span> ⲙⲁ[ⲩ....]ϣⲟ[ⲟⲡ’ ⲟⲛ]ⲧⲱⲥ ⲉⲥ‐ <text:line-break/><text:span text:style-name="T1"> </text:span><text:span text:style-name="T2">(37/6) </text:span> ϣⲟ̣[.........] ⲛⲧⲁϥ ⲧⲉ· <text:line-break/><text:span text:style-name="T1"> </text:span><text:span text:style-name="T2">(37/7) </text:span> [.]ⲡ[........ ⲉ]ⲩⲣ ϣⲟⲣⲡ’ <text:line-break/><text:span text:style-name="T1"> </text:span><text:span text:style-name="T2">(37/8) </text:span> ⲛ̣ ⲟ̣[........]..ⲉ ⲛⲧⲉ ⲡⲏ ⲉ‐ <text:line-break/><text:span text:style-name="T1"> </text:span><text:span text:style-name="T2">(37/9) </text:span> [ⲧ]ⲙ̣[ⲙⲁⲩ....]ϥ· ⲛⲧⲟϥ ⲇⲉ ⲡⲓⲁⲧ’ <text:line-break/><text:span text:style-name="T1"> </text:span><text:span text:style-name="T2">(37/10) </text:span> [ ]ⲗ· ⲛⲧⲟϥ ⲙⲁⲩⲁⲁϥ <text:line-break/><text:span text:style-name="T1"> </text:span><text:span text:style-name="T2">(37/11) </text:span> [ ].ϯ ⲛⲁϥ ⲙ ⲡⲣⲱⲙⲉ <text:line-break/><text:span text:style-name="T1"> </text:span><text:span text:style-name="T2">(37/12) </text:span> [ ]. ⲁⲧ’ϣⲱ̣[..] ⲛⲁϥ <text:line-break/><text:span text:style-name="T1"> </text:span><text:span text:style-name="T2">(37/13) </text:span> [ ]ϥ ⲧⲏⲣⲟⲩ̣[·] ⲉϥϯ <text:line-break/><text:span text:style-name="T1"> </text:span><text:span text:style-name="T2">(37/14) </text:span> [ ]ⲩ ⲉⲃⲟⲗ ϩⲓⲧⲛ ⲛⲉ <text:line-break/><text:span text:style-name="T1"> </text:span><text:span text:style-name="T2">(37/15) </text:span> [ ]ⲉ ⲡⲁⲓ ⲅⲁⲣ ϩⲉⲛⲙⲉ <text:line-break/><text:span text:style-name="T1"> </text:span><text:span text:style-name="T2">(37/16) </text:span> [ ]ⲥ ϩⲓⲛⲁ ϫⲉ ⲉϥⲉϣⲱ‐ <text:line-break/><text:span text:style-name="T1"> </text:span><text:span text:style-name="T2">(37/17) </text:span> [ ].· ⲁ̣ⲩⲱ ⲡ[ⲉ]ⲧ̣ⲉ <text:line-break/><text:span text:style-name="T1"> </text:span><text:span text:style-name="T2">(37/18) </text:span> [ ]ⲧⲉ ⲙⲙⲟϥ̣ ⲛ <text:line-break/><text:soft-page-break/><text:span text:style-name="T1"> </text:span><text:span text:style-name="T2">(37/19) </text:span> [ ]ⲁ̣ⲧ’ⲡⲱⲣϫ ⲉⲣⲟϥ· <text:line-break/><text:span text:style-name="T1"> </text:span><text:span text:style-name="T2">(37/20) </text:span> [ ⲃ̅ⲁ̅]̅ⲣ̅ⲃ̅ⲏ̅ⲗ̅ⲱ̅· ⲁϥⲧⲟ‐ <text:line-break/><text:span text:style-name="T1"> </text:span><text:span text:style-name="T2">(37/21) </text:span> [ ϩⲓ]ⲛ̣ⲁ ϫⲉ ⲉϥⲉϣⲱ‐ <text:line-break/><text:span text:style-name="T1"> </text:span><text:span text:style-name="T2">(37/22) </text:span> [ ]ⲙⲛⲧ’ⲙⲁⲕⲁ <text:line-break/><text:span text:style-name="T1"> </text:span><text:span text:style-name="T2">(37/23) </text:span> [ⲣⲓⲟⲥ ]ⲥⲓⲥ ⲛ ⲟⲩ‐ <text:line-break/><text:span text:style-name="T1"> </text:span><text:span text:style-name="T2">(37/24) </text:span> [ ] ⲧⲏⲣⲏⲩ· <text:line-break/><text:span text:style-name="T1"> </text:span><text:span text:style-name="T2">(37/25) </text:span> [ ].ϥⲉⲓ <text:line-break/><text:span text:style-name="T1"> </text:span><text:span text:style-name="T2">(37/26) </text:span> [ ].ⲁ <text:line-break/><text:span text:style-name="T1"> </text:span><text:span text:style-name="T2">(37/27) </text:span> [ ]ⲁ̣ <text:line-break/><text:span text:style-name="T1"> </text:span><text:span text:style-name="T2">(37/28) </text:span> [ ]ⲣ <text:line-break/><text:span text:style-name="T1"> </text:span><text:span text:style-name="T2">(37/29) </text:span> [ ]ⲗ̣ⲓⲟ̣[ <text:line-break/><text:span text:style-name="T1"> </text:span><text:span text:style-name="T2">(38/1) </text:span> ⲟⲩ[.......] ⲛⲧⲉ ⲡⲓⲧⲉⲗⲓⲟ[ⲥ] ⲛ̣ <text:line-break/><text:span text:style-name="T1"> </text:span><text:span text:style-name="T2">(38/2) </text:span> ⲛⲟ[ⲩⲥ ......]ⲥⲧ̣ⲡ̣ ⲁⲩⲱ̣ ⲉϥ[.. <text:line-break/><text:span text:style-name="T1"> </text:span><text:span text:style-name="T2">(38/3) </text:span> ⲛ̣ [.........] ⲛ̣ ⲧ̣ⲉⲗⲓⲟⲥ ⲙ ⲡ̅ⲛ̣̅̅[̅ⲁ̅] <text:line-break/><text:span text:style-name="T1"> </text:span><text:span text:style-name="T2">(38/4) </text:span> ⲉ̣[.......ⲧ]ⲉⲗⲓ̣ⲟ̣ⲥ̣ ⲉϥⲟ̣ⲛ̣ϩ ⲛ <text:line-break/><text:span text:style-name="T1"> </text:span><text:span text:style-name="T2">(38/5) </text:span> ϣⲁ ⲉⲛⲉ[ϩ...]ⲩⲧ[.....].ⲛ[. <text:line-break/><text:span text:style-name="T1"> </text:span><text:span text:style-name="T2">(38/6) </text:span> ⲉⲣⲟϥ· ⲁⲩⲱ̣[..]ⲟⲟ̣[...ⲡ]ⲁ̣ⲓ̈ ⲉϥ‐ <text:line-break/><text:span text:style-name="T1"> </text:span><text:span text:style-name="T2">(38/7) </text:span> ϣⲟⲟⲡ’̣[...]ⲡⲉ ⲛ‐ <text:line-break/><text:span text:style-name="T1"> </text:span><text:span text:style-name="T2">(38/8) </text:span> ⲧⲉ ⲡⲓⲧ[...ϣ]ⲁϫⲉ <text:line-break/><text:span text:style-name="T1"> </text:span><text:span text:style-name="T2">(38/9) </text:span> ⲡⲉ ⲉⲃⲟⲗ ϩⲛ [.........].[. <text:line-break/><text:span text:style-name="T1"> </text:span><text:span text:style-name="T2">(38/10) </text:span> ⲉⲧ’ϣⲟⲟⲡ’ ϩⲙ̣ [ <text:line-break/><text:span text:style-name="T1"> </text:span><text:span text:style-name="T2">(38/11) </text:span> ⲛⲧⲁⲩ ⲛ ⲛⲁⲓ̈ ⲧⲏ̣[ⲣⲟⲩ <text:line-break/><text:span text:style-name="T1"> </text:span><text:span text:style-name="T2">(38/12) </text:span> ϣⲁ ⲉⲛⲉϩ· ⲉ.[ <text:line-break/><text:span text:style-name="T1"> </text:span><text:span text:style-name="T2">(38/13) </text:span> ⲟⲡ [ϩ]ⲙ ⲡⲓϣⲙ[ⲧ’ϭⲟⲙ... <text:line-break/><text:span text:style-name="T1"> </text:span><text:span text:style-name="T2">(38/14) </text:span> ϣ[ⲟⲟ]ⲡ’ ϩⲙ ⲡⲓ[... <text:line-break/><text:span text:style-name="T1"> </text:span><text:span text:style-name="T2">(38/15) </text:span> ⲛⲉ ⲛ ⲛⲏ ⲉⲧ’ϣⲟ̣[ⲟⲡ’... <text:line-break/><text:span text:style-name="T1"> </text:span><text:span text:style-name="T2">(38/16) </text:span> ⲛ ⲧⲉⲗⲓⲟⲥ· ⲛ ⲧ[... <text:line-break/><text:span text:style-name="T1"> </text:span><text:span text:style-name="T2">(38/17) </text:span> ⲡⲓⲡⲣⲱⲧⲟⲫⲁ̣[ⲛⲏⲥ... <text:line-break/><text:span text:style-name="T1"> </text:span><text:span text:style-name="T2">(38/18) </text:span> ⲛⲟⲩⲥ· ⲁⲗⲗⲁ .[... <text:line-break/><text:span text:style-name="T1"> </text:span><text:span text:style-name="T2">(38/19) </text:span> ⲧⲟ̣ⲩⲃⲏⲟ[ⲩⲧ’... <text:line-break/><text:span text:style-name="T1"> </text:span><text:span text:style-name="T2">(38/20) </text:span> ⲁⲩⲱ ⲡⲏ ⲙ[... <text:line-break/><text:span text:style-name="T1"> </text:span><text:span text:style-name="T2">(38/21) </text:span> ⲛⲧⲉ ⲟⲩⲉⲓⲛⲉ̣ [... <text:line-break/><text:span text:style-name="T1"> </text:span><text:span text:style-name="T2">(38/22) </text:span> ⲟⲩⲱⲛϩ ⲉⲃⲟ̣[ⲗ... <text:line-break/><text:span text:style-name="T1"> </text:span><text:span text:style-name="T2">(38/23) </text:span> ⲁⲩⲱ ⲡⲓⲁ[ⲧ’... <text:line-break/><text:span text:style-name="T1"> </text:span><text:span text:style-name="T2">(38/24) </text:span> ⲡⲉ ⲛ ⲧ[... <text:line-break/><text:span text:style-name="T1"> </text:span><text:span text:style-name="T2">(38/25) </text:span> ⲙⲙⲟϥ [... <text:line-break/><text:span text:style-name="T1"> </text:span><text:span text:style-name="T2">(38/26) </text:span> ⲛ ⲧ.[... <text:line-break/><text:span text:style-name="T1"> </text:span><text:span text:style-name="T2">(38/27) </text:span> ⲡ[... <text:line-break/><text:span text:style-name="T1"> </text:span><text:span text:style-name="T2">(38/28) </text:span> ⲙ[... <text:line-break/><text:span text:style-name="T1"> </text:span><text:span text:style-name="T2">(38/29) </text:span> ϩ.[... <text:line-break/><text:span text:style-name="T1"> </text:span><text:span text:style-name="T2">(38/30) </text:span> .[... <text:line-break/><text:span text:style-name="T1"> </text:span><text:span text:style-name="T2">(39/1) </text:span> [ ].ⲥ· <text:line-break/><text:span text:style-name="T1"> </text:span><text:span text:style-name="T2">(39/2) </text:span> [.]ⲙ̣ⲉϥ..[ ] ⲛ̅ϭⲓ <text:line-break/><text:span text:style-name="T1"> </text:span><text:span text:style-name="T2">(39/3) </text:span> [..]ⲟⲩ[ ].ϥⲉ <text:line-break/><text:span text:style-name="T1"> </text:span><text:span text:style-name="T2">(39/4) </text:span> [ ]ⲡ’̣ <text:line-break/><text:span text:style-name="T1"> </text:span><text:span text:style-name="T2">(39/5) </text:span> [ ⲉ]ⲧⲃⲏⲏⲧϥ ⲉⲩ‐ <text:line-break/><text:span text:style-name="T1"> </text:span><text:span text:style-name="T2">(39/6) </text:span> [ ]..ϯ ϣⲱⲗϩ ⲉⲣⲟϥ· <text:line-break/><text:soft-page-break/><text:span text:style-name="T1"> </text:span><text:span text:style-name="T2">(39/7) </text:span> [ ϩⲁ]ⲡⲗ̣ⲟⲩⲥ ⲡⲉ <text:line-break/><text:span text:style-name="T1"> </text:span><text:span text:style-name="T2">(39/8) </text:span> [ ⲅ]ⲁⲣ ⲡⲉ ⲛ <text:line-break/><text:span text:style-name="T1"> </text:span><text:span text:style-name="T2">(39/9) </text:span> [ ]ⲙ.ϥ ϩⲱⲥ ⲉϥϣⲟ‐ <text:line-break/><text:span text:style-name="T1"> </text:span><text:span text:style-name="T2">(39/10) </text:span> [ⲟⲡ’ ]ⲱ ϩⲱⲥ ⲉⲕⲉⲟⲩⲁ <text:line-break/><text:span text:style-name="T1"> </text:span><text:span text:style-name="T2">(39/11) </text:span> [ ].ⲟ[.]ⲉⲧⲉ ⲡⲁⲓ̈ ⲡⲉ <text:line-break/><text:span text:style-name="T1"> </text:span><text:span text:style-name="T2">(39/12) </text:span> [ ]ϣⲱⲱⲧ’· ⲉⲧⲃⲉ <text:line-break/><text:span text:style-name="T1"> </text:span><text:span text:style-name="T2">(39/13) </text:span> [ ]ϣⲙⲧ’ϩⲟ[ⲟⲩⲧ] ⲛ̣ <text:line-break/><text:span text:style-name="T1"> </text:span><text:span text:style-name="T2">(39/14) </text:span> [ ϣⲟⲟ]ⲡ’̣ ⲟⲛⲧⲱ[ⲥ] ⲛⲧⲉ <text:line-break/><text:span text:style-name="T1"> </text:span><text:span text:style-name="T2">(39/15) </text:span> [ ⲛⲟ]ⲩⲥ ⲛⲧⲉ ϯⲅⲛⲱ‐ <text:line-break/><text:span text:style-name="T1"> </text:span><text:span text:style-name="T2">(39/16) </text:span> [ⲥⲓⲥ ]ⲉ ⲛⲏ ⲉⲧ’ϣⲟⲟⲡ’ <text:line-break/><text:span text:style-name="T1"> </text:span><text:span text:style-name="T2">(39/17) </text:span> [ ]ⲧⲉ ⲉⲧⲉ ⲟⲩⲛⲧⲁϥ <text:line-break/><text:span text:style-name="T1"> </text:span><text:span text:style-name="T2">(39/18) </text:span> [ ]ϣ̣ⲟⲟⲡ’ ⲟⲛⲧⲱⲥ· <text:line-break/><text:span text:style-name="T1"> </text:span><text:span text:style-name="T2">(39/19) </text:span> [ ]. ⲁⲩ̣ⲱ ⲟⲩ.[.]ⲱ <text:line-break/><text:span text:style-name="T1"> </text:span><text:span text:style-name="T2">(39/20) </text:span> [ ⲉ]ⲃⲟⲗ· ⲁⲩⲱ ⲁ̣ⲥ‐ <text:line-break/><text:span text:style-name="T1"> </text:span><text:span text:style-name="T2">(39/21) </text:span> [ ]ⲩ ⲙ ⲙⲉϩⲥⲛⲁⲩ <text:line-break/><text:span text:style-name="T1"> </text:span><text:span text:style-name="T2">(39/22) </text:span> [ ⲧ]ⲉⲗⲓⲟⲥ· ⲉⲧⲉ <text:line-break/><text:span text:style-name="T1"> </text:span><text:span text:style-name="T2">(39/23) </text:span> [ ⲟ]ⲩⲱⲛϩ ⲉⲃⲟⲗ <text:line-break/><text:span text:style-name="T1"> </text:span><text:span text:style-name="T2">(39/24) </text:span> [ ]ϩ̣ⲏⲧϥ ⲉⲩ‐ <text:line-break/><text:span text:style-name="T1"> </text:span><text:span text:style-name="T2">(39/25) </text:span> [ ]ⲡ̣ⲓⲕ̅ⲗ̅ⲥ̅· <text:line-break/><text:span text:style-name="T1"> </text:span><text:span text:style-name="T2">(39/26) </text:span> [ ] ⲛ ⲁⲧ’‐ <text:line-break/><text:span text:style-name="T1"> </text:span><text:span text:style-name="T2">(39/27) </text:span> [ ] ⲛ ⲟⲩ‐ <text:line-break/><text:span text:style-name="T1"> </text:span><text:span text:style-name="T2">(39/28) </text:span> [ ] ⲛ ⲁⲧ’ <text:line-break/><text:span text:style-name="T1"> </text:span><text:span text:style-name="T2">(39/29) </text:span> [ ⲉⲓ]ⲇⲟⲥ <text:line-break/><text:span text:style-name="T1"> </text:span><text:span text:style-name="T2">(39/30) </text:span> [ ]ⲉ <text:line-break/><text:span text:style-name="T1"> </text:span><text:span text:style-name="T2">(39/31) </text:span> [ ] ⲛ ⲛⲁⲓ̈ <text:line-break/><text:span text:style-name="T1"> </text:span><text:span text:style-name="T2">(40/1) </text:span> ⲗⲟ[ ]ⲁ̣ϩⲡ̣[...] <text:line-break/><text:span text:style-name="T1"> </text:span><text:span text:style-name="T2">(40/2) </text:span> ⲡ[ ]ⲣⲟ̣ⲩ[ <text:line-break/><text:span text:style-name="T1"> </text:span><text:span text:style-name="T2">(40/3) </text:span> ⲧ[ ]ⲩ.[ <text:line-break/><text:span text:style-name="T1"> </text:span><text:span text:style-name="T2">(40/4) </text:span> ⲟ[ <text:line-break/><text:span text:style-name="T1"> </text:span><text:span text:style-name="T2">(40/5) </text:span> ⲉⲓⲇⲟⲥ ⲃ̅ [... <text:line-break/><text:span text:style-name="T1"> </text:span><text:span text:style-name="T2">(40/6) </text:span> §ⲉⲩⲅⲛⲱⲥ̣[ⲓⲥ ⲡⲓⲡⲣⲱ]‐ <text:line-break/><text:span text:style-name="T1"> </text:span><text:span text:style-name="T2">(40/7) </text:span> ⲧⲟⲫⲁ[ⲛⲏⲥ ϩⲟ]‐ <text:line-break/><text:span text:style-name="T1"> </text:span><text:span text:style-name="T2">(40/8) </text:span> ⲟⲩⲧ’ ⲛ [ ‐ⲩⲛ+] <text:line-break/><text:span text:style-name="T1"> </text:span><text:span text:style-name="T2">(40/9) </text:span> ⲧⲁϥ ⲙⲙⲁⲩ ⲛ̣ [ ϩⲩⲡⲁⲣ]‐ <text:line-break/><text:span text:style-name="T1"> </text:span><text:span text:style-name="T2">(40/10) </text:span> ⲝⲓⲥ ⲛϩⲣⲁⲓ̈ [ <text:line-break/><text:span text:style-name="T1"> </text:span><text:span text:style-name="T2">(40/11) </text:span> ⲁⲧ’ⲙⲓⲥⲉ· ⲉⲩ̣[ <text:line-break/><text:span text:style-name="T1"> </text:span><text:span text:style-name="T2">(40/12) </text:span> ⲙⲉϩϣⲟⲙⲧ’ ⲛ̣ [ <text:line-break/><text:span text:style-name="T1"> </text:span><text:span text:style-name="T2">(40/13) </text:span> [...]. ⲉⲩⲛⲧ[ⲁϥ ⲙⲙⲁⲩ <text:line-break/><text:span text:style-name="T1"> </text:span><text:span text:style-name="T2">(40/14) </text:span> ⲉⲓⲙⲉ· ⲁⲩⲱ ⲉ.[ <text:line-break/><text:span text:style-name="T1"> </text:span><text:span text:style-name="T2">(40/15) </text:span> ϣⲟⲟⲡ’ ϩⲓ ⲟⲩⲙ[ⲁ <text:line-break/><text:span text:style-name="T1"> </text:span><text:span text:style-name="T2">(40/16) </text:span> ⲡⲉ ⲙ ⲡⲁⲛⲧⲉⲗ̣[ⲓⲁ...ⲙⲁⲕⲁ]‐ <text:line-break/><text:span text:style-name="T1"> </text:span><text:span text:style-name="T2">(40/17) </text:span> ⲣⲓⲟ̣ⲥ ⲉⲙⲛ ⲗ[ⲁⲁⲩ <text:line-break/><text:span text:style-name="T1"> </text:span><text:span text:style-name="T2">(40/18) </text:span> ⲙⲙⲁⲩ· ⲁ[ <text:line-break/><text:span text:style-name="T1"> </text:span><text:span text:style-name="T2">(40/19) </text:span> ⲉⲃⲟⲗ· ⲉⲃⲟⲗ̣ [ <text:line-break/><text:span text:style-name="T1"> </text:span><text:span text:style-name="T2">(40/20) </text:span> ⲛⲟⲩⲧⲉ ⲡ.[ <text:line-break/><text:span text:style-name="T1"> </text:span><text:span text:style-name="T2">(40/21) </text:span> ⲧϥ ⲛⲙⲙⲁϥ̣ [ <text:line-break/><text:span text:style-name="T1"> </text:span><text:span text:style-name="T2">(40/22) </text:span> ⲛ ⲟⲩⲱ.[ <text:line-break/><text:soft-page-break/><text:span text:style-name="T1"> </text:span><text:span text:style-name="T2">(40/23) </text:span> ⲛ ⲧⲉⲗ̣[ⲓⲟⲥ <text:line-break/><text:span text:style-name="T1"> </text:span><text:span text:style-name="T2">(40/24) </text:span> ⲛⲧⲉ ⲡ[ <text:line-break/><text:span text:style-name="T1"> </text:span><text:span text:style-name="T2">(40/25) </text:span> ⲕ̅ⲗ̅ⲥ̣̅̅ [ <text:line-break/><text:span text:style-name="T1"> </text:span><text:span text:style-name="T2">(40/26) </text:span> ⲃⲁ[ <text:line-break/><text:span text:style-name="T1"> </text:span><text:span text:style-name="T2">(40/27) </text:span> ⲁ[ <text:line-break/><text:span text:style-name="T1"> </text:span><text:span text:style-name="T2">(40/28) </text:span> ⲱ[ <text:line-break/><text:span text:style-name="T1"> </text:span><text:span text:style-name="T2">(40/29) </text:span> ⲇ[ <text:line-break/><text:span text:style-name="T1"> </text:span><text:span text:style-name="T2">(41/1) </text:span> [.].ⲕⲁ[ ]ⲓⲉⲓⲙⲉ <text:line-break/><text:span text:style-name="T1"> </text:span><text:span text:style-name="T2">(41/2) </text:span> [..]ⲛ̣ⲱ̣[ ] ⲛⲧⲉ <text:line-break/><text:span text:style-name="T1"> </text:span><text:span text:style-name="T2">(41/3) </text:span> [...].[ ⲡⲣ]ⲱⲧⲟ‐ <text:line-break/><text:span text:style-name="T1"> </text:span><text:span text:style-name="T2">(41/4) </text:span> [ⲫⲁⲛⲏⲥ ⲡ]ⲓ̣ⲛ̣ⲟⲩ[ⲥ] ⲛⲧⲉ <text:line-break/><text:span text:style-name="T1"> </text:span><text:span text:style-name="T2">(41/5) </text:span> [ ]ⲁ̣ⲩ ⲛ ⲛⲓϭⲟⲙ <text:line-break/><text:span text:style-name="T1"> </text:span><text:span text:style-name="T2">(41/6) </text:span> [ ] ⲡⲧⲏⲣϥ ⲛϩⲣⲁⲓ̈ <text:line-break/><text:span text:style-name="T1"> </text:span><text:span text:style-name="T2">(41/7) </text:span> [...] ⲁ̣ⲩⲱ ϥϣⲟ‐ <text:line-break/><text:span text:style-name="T1"> </text:span><text:span text:style-name="T2">(41/8) </text:span> [ⲟⲡ’ ] ⲧ̣ⲉ̣ⲓ̣̈ⲅ̣ⲛⲱⲥⲓⲥ ⲛ <text:line-break/><text:span text:style-name="T1"> </text:span><text:span text:style-name="T2">(41/9) </text:span> [...]ⲛⲟⲩⲧⲉ ⲡⲓⲁⲩⲧⲟ‐ <text:line-break/><text:span text:style-name="T1"> </text:span><text:span text:style-name="T2">(41/10) </text:span> [ⲅⲉⲛⲏⲥ· ⲡⲓⲁⲩⲧⲟ]ⲅ̣ⲉⲛⲏⲥ ⲇⲉ ⲛ ⲛⲟⲩ‐ <text:line-break/><text:span text:style-name="T1"> </text:span><text:span text:style-name="T2">(41/11) </text:span> [ⲧⲉ ] ⲛ̣ⲧⲉ ⲡⲓⲁⲗⲟⲩ ⲛⲧⲉ <text:line-break/><text:span text:style-name="T1"> </text:span><text:span text:style-name="T2">(41/12) </text:span> [.......]ϣⲙⲧ’[ϩ]ⲟⲟⲩⲧ’· ⲡⲉ̣ⲓ̣̈ϩ̣ⲟⲟⲩⲧ’ <text:line-break/><text:span text:style-name="T1"> </text:span><text:span text:style-name="T2">(41/13) </text:span> [........]ⲡⲟ[.] ⲡⲉ ⲙⲛ ⲟⲩ[ⲉⲓ]ⲇ̣ⲟ̣ⲥ <text:line-break/><text:span text:style-name="T1"> </text:span><text:span text:style-name="T2">(41/14) </text:span> [..........] ⲛ ⲧⲉⲗⲓⲟⲥ ⲉⲙⲙⲛⲧⲁϥ <text:line-break/><text:span text:style-name="T1"> </text:span><text:span text:style-name="T2">(41/15) </text:span> [....]ⲡ[.....] ⲛ̣ϩ̣ⲣⲁⲓ̈ ϩⲛ ⲟⲩⲅⲛⲱⲥⲓⲥ <text:line-break/><text:span text:style-name="T1"> </text:span><text:span text:style-name="T2">(41/16) </text:span> [ⲛ ⲟⲩ]ⲱⲧ’ ⲙ [ⲡ]ⲣⲏⲧⲉ ⲙ ⲡⲏ ⲉⲧⲙⲙⲁⲩ· <text:line-break/><text:span text:style-name="T1"> </text:span><text:span text:style-name="T2">(41/17) </text:span> [....] ⲟⲩϣ[ⲱ]ⲡ̣ⲉ ⲛⲧⲉ ⲛⲓⲕⲁⲧⲁ ⲟⲩⲁ <text:line-break/><text:span text:style-name="T1"> </text:span><text:span text:style-name="T2">(41/18) </text:span> [ⲙⲛ] ⲟ̣ⲩⲅⲛⲱ[ⲥ]ⲓ̣[ⲥ] ⲛ ⲟⲩⲱⲧ’ ⲛⲧⲉ ⲛⲓ‐ <text:line-break/><text:span text:style-name="T1"> </text:span><text:span text:style-name="T2">(41/19) </text:span> [ⲕ]ⲁ̣ⲧⲁ ⲟ̣ⲩⲁ [.]ⲟ̣[....] ⲕⲁⲧⲁ ⲡⲧⲙⲣϥ <text:line-break/><text:span text:style-name="T1"> </text:span><text:span text:style-name="T2">(41/20) </text:span> [...]ⲱⲕ[......] ⲛ̣ ⲧⲉⲗⲓⲟⲥ· ⲡⲓϩⲟ‐ <text:line-break/><text:span text:style-name="T1"> </text:span><text:span text:style-name="T2">(41/21) </text:span> [ⲟ]ⲩⲧ’ ⲇⲉ̣ [.......] ⲛ̣ ⲛⲟⲩⲥ ⲟⲩ‐ <text:line-break/><text:span text:style-name="T1"> </text:span><text:span text:style-name="T2">(41/22) </text:span> [..]ⲱ..[.....]ⲉ ⲡⲓⲕ̅ⲗ̅ⲥ̅· ⲡⲓⲕ̅ⲗⲥ̅ <text:line-break/><text:span text:style-name="T1"> </text:span><text:span text:style-name="T2">(41/23) </text:span> [ⲇⲉ] ⲛ ⲛ[.......] ⲛ ⲛⲟⲩⲧⲉ· ⲟⲩⲁⲣ‐ <text:line-break/><text:span text:style-name="T1"> </text:span><text:span text:style-name="T2">(41/24) </text:span> [ⲭⲏ ]ⲉⲓϭ. ⲁ̣ⲩⲱ ⲟⲩϭⲟⲙ <text:line-break/><text:span text:style-name="T1"> </text:span><text:span text:style-name="T2">(41/25) </text:span> [ ]ⲥ ⲛⲧ[ⲉ] ⲛⲁⲓ̈ ⲧⲏⲣⲟⲩ· <text:line-break/><text:span text:style-name="T1"> </text:span><text:span text:style-name="T2">(41/26) </text:span> [ ⲟⲛ]ⲧⲱⲥ <text:line-break/><text:span text:style-name="T1"> </text:span><text:span text:style-name="T2">(41/27) </text:span> [ ]ⲉ <text:line-break/><text:span text:style-name="T1"> </text:span><text:span text:style-name="T2">(41/28) </text:span> [ ]ⲙⲉ <text:line-break/><text:span text:style-name="T1"> </text:span><text:span text:style-name="T2">(41/29) </text:span> [ ]ⲓ‐ <text:line-break/><text:span text:style-name="T1"> </text:span><text:span text:style-name="T2">(41/30) </text:span> [ ⲡⲣⲱ]ⲧⲟ‐ <text:line-break/><text:span text:style-name="T1"> </text:span><text:span text:style-name="T2">(41/31) </text:span> [ⲫⲁⲛⲏⲥ ]ⲡ̣ⲣⲱ‐ <text:line-break/><text:span text:style-name="T1"> </text:span><text:span text:style-name="T2">(42/1) </text:span> ⲧⲟ[ⲫⲁⲛⲏⲥ ]ⲩⲉⲣ[.. <text:line-break/><text:span text:style-name="T1"> </text:span><text:span text:style-name="T2">(42/2) </text:span> ⲟⲩ[...]ⲛ̣ⲟⲩⲥ̣ [... <text:line-break/><text:span text:style-name="T1"> </text:span><text:span text:style-name="T2">(42/3) </text:span> ⲙ[...]ⲉⲩ̣[... <text:line-break/><text:span text:style-name="T1"> </text:span><text:span text:style-name="T2">(42/4) </text:span> ϩⲓ̣[ <text:line-break/><text:span text:style-name="T1"> </text:span><text:span text:style-name="T2">(42/5) </text:span> ⲧⲁⲡⲧⲏ[ⲣϥ <text:line-break/><text:span text:style-name="T1"> </text:span><text:span text:style-name="T2">(42/6) </text:span> ⲛⲛ ⲁⲧⲙⲓⲥ̣[ⲉ <text:line-break/><text:span text:style-name="T1"> </text:span><text:span text:style-name="T2">(42/7) </text:span> ⲛ ⲣⲱⲙⲉ ⲛ[ <text:line-break/><text:span text:style-name="T1"> </text:span><text:span text:style-name="T2">(42/8) </text:span> ϫⲉ ⲥⲉⲏ[ <text:line-break/><text:span text:style-name="T1"> </text:span><text:span text:style-name="T2">(42/9) </text:span> ϩⲙ ⲙⲛ ⲡⲏ̣ ⲉ[ⲧ <text:line-break/><text:soft-page-break/><text:span text:style-name="T1"> </text:span><text:span text:style-name="T2">(42/10) </text:span> ⲁⲩⲱ ⲡⲏ ⲉⲧⲣ [ <text:line-break/><text:span text:style-name="T1"> </text:span><text:span text:style-name="T2">(42/11) </text:span> ⲡⲏ ⲉⲧ’ϭⲁⲗⲏ̣ⲟ̣[ⲩⲧ’........ <text:line-break/><text:span text:style-name="T1"> </text:span><text:span text:style-name="T2">(42/12) </text:span> ⲟⲡ’ ϩⲙ ⲡⲓⲉⲥⲑⲏ̣[ⲧ]ⲟ̣ⲛ̣ [ⲛ ⲕⲟⲥⲙⲟⲥ] <text:line-break/><text:span text:style-name="T1"> </text:span><text:span text:style-name="T2">(42/13) </text:span> ⲉϥ[ⲟ]ⲛ̣ϩ ⲙⲛ ⲡⲏ [ⲉ]ⲧ’ⲙⲟⲟ̣[ⲩⲧ’... <text:line-break/><text:span text:style-name="T1"> </text:span><text:span text:style-name="T2">(42/14) </text:span> ..[.]ⲉ ⲧⲏⲣⲟⲩ ⲉⲩ[....... <text:line-break/><text:span text:style-name="T1"> </text:span><text:span text:style-name="T2">(42/15) </text:span> ϣⲁϣⲛⲓ ⲉⲩⲟⲩϫⲁⲓ̣̈ [..]ⲁ.[... <text:line-break/><text:span text:style-name="T1"> </text:span><text:span text:style-name="T2">(42/16) </text:span> ⲡⲏ ⲉⲧ’ⲙⲟⲟⲩⲧ’· ⲛⲁⲓ̣̈ ⲇ̣[ⲉ] ⲧⲏ̣[ⲣⲟⲩ] <text:line-break/><text:span text:style-name="T1"> </text:span><text:span text:style-name="T2">(42/17) </text:span> ⲉⲙⲡⲟⲩⲣ ϩⲁⲉ ⲛ ⲟ[ⲩⲟ]ⲩⲇⲁⲓ̈ [... <text:line-break/><text:span text:style-name="T1"> </text:span><text:span text:style-name="T2">(42/18) </text:span> ϣⲟⲣⲡ’· ⲁⲗⲗⲁ ⲉⲩ[ⲛⲟ]ⲩ̣ϩⲙ ⲛϩ[ⲟⲩ]‐ <text:line-break/><text:span text:style-name="T1"> </text:span><text:span text:style-name="T2">(42/19) </text:span> ⲟ [ⲇ]ⲉ ⲉⲩϣⲟⲟⲡ’ ⲉⲩⲑⲉⲃⲓⲏⲟ [ⲩ ʹ264] <text:line-break/><text:span text:style-name="T1"> </text:span><text:span text:style-name="T2">(42/20) </text:span> ⲁⲩⲱ ⲡⲓⲣⲱ̣[ⲙⲉ ⲛⲧⲉ] ⲛⲉ̣ⲧ’ⲙⲟ̣[ⲟⲩⲧ’] <text:line-break/><text:span text:style-name="T1"> </text:span><text:span text:style-name="T2">(42/21) </text:span> ⲧⲉϥⲯⲩⲭⲏ ⲙ[ⲛ ⲡⲉϥⲛⲟ]ⲩⲥ ⲁⲩ̣[ⲱ] <text:line-break/><text:span text:style-name="T1"> </text:span><text:span text:style-name="T2">(42/22) </text:span> ⲡⲉϥⲥⲱⲙⲁ [ⲥⲉⲙⲟⲟⲩ]ⲧ’ ⲧⲏⲣ[ⲟⲩ] <text:line-break/><text:span text:style-name="T1"> </text:span><text:span text:style-name="T2">(42/23) </text:span> ϩⲉⲛϫⲓ ⲕⲁⲥ ⲛ[......]ⲏ̣ⲟ̣[... <text:line-break/><text:span text:style-name="T1"> </text:span><text:span text:style-name="T2">(42/24) </text:span> ϩⲉⲛⲉⲓⲟⲧ[ⲉ] ⲛⲧⲉ [ ϩⲩ]‐ <text:line-break/><text:span text:style-name="T1"> </text:span><text:span text:style-name="T2">(42/25) </text:span> ⲗⲓⲕⲟⲛ· ϩⲉⲛ.[ <text:line-break/><text:span text:style-name="T1"> </text:span><text:span text:style-name="T2">(42/26) </text:span> ⲡⲓⲕⲱ̣ϩ̣ⲧ̣ ⲟⲩ[ <text:line-break/><text:span text:style-name="T1"> </text:span><text:span text:style-name="T2">(42/27) </text:span> ⲕⲟ[ <text:line-break/><text:span text:style-name="T1"> </text:span><text:span text:style-name="T2">(42/28) </text:span> ⲟ.[ <text:line-break/><text:span text:style-name="T1"> </text:span><text:span text:style-name="T2">(42/29) </text:span> ⲕ.[ <text:line-break/><text:span text:style-name="T1"> </text:span><text:span text:style-name="T2">(42/30) </text:span> ⲉ[ <text:line-break/><text:span text:style-name="T1"> </text:span><text:span text:style-name="T2">(43/1) </text:span> ⲉϥⲟⲩⲟⲧⲃ ⲉⲃⲟⲗ̣· ʹ264 ⲡ[ⲓ]ⲙⲉϩⲥⲛⲁⲩ ⲇⲉ <text:line-break/><text:span text:style-name="T1"> </text:span><text:span text:style-name="T2">(43/2) </text:span> ⲛ ⲣⲱ̣ⲙⲉ ⲡⲉ ϯⲯⲩⲭⲏ ⲛⲛ ⲁⲧⲙⲟⲩ <text:line-break/><text:span text:style-name="T1"> </text:span><text:span text:style-name="T2">(43/3) </text:span> ⲉⲧ’[ϣ]ⲟⲟⲡ’ ϩⲛ ⲛⲏ ⲉⲧ’ⲙⲟⲟⲩⲧ’ <text:line-break/><text:span text:style-name="T1"> </text:span><text:span text:style-name="T2">(43/4) </text:span> ⲉⲥϥ̣[ⲓ ⲛ] ⲟⲩⲣⲟ̣ⲟⲩϣ ⲛⲁⲥ· ⲧⲟⲧⲉ <text:line-break/><text:span text:style-name="T1"> </text:span><text:span text:style-name="T2">(43/5) </text:span> [ⲅⲁ]ⲣ̣ ϣⲁ̣ⲥⲉ̣ⲓ̣[ⲣ]ⲉ ⲛ ⲟⲩϣⲓⲛⲉ ⲛ ⲛⲉ‐ <text:line-break/><text:span text:style-name="T1"> </text:span><text:span text:style-name="T2">(43/6) </text:span> ⲧⲣ ⲛⲁϥⲣⲉ [ⲕⲁⲧⲁ ⲡⲟ]ⲩⲁ ⲡⲟⲩⲁ ⲙ‐ <text:line-break/><text:span text:style-name="T1"> </text:span><text:span text:style-name="T2">(43/7) </text:span> ⲙⲟ̣ⲟ̣ⲩ· ⲁ̣[ⲩⲱ ϣⲁⲥⲣ] ⲉⲥ̣ⲑⲁⲛⲉⲥⲑⲉ <text:line-break/><text:span text:style-name="T1"> </text:span><text:span text:style-name="T2">(43/8) </text:span> ⲉ ⲡ̣[ⲓ]ⲙⲕⲁϩ ⲛ [ⲥⲱ]ⲙⲁⲧⲓⲕⲟⲛ ϣⲁⲩ‐ <text:line-break/><text:span text:style-name="T1"> </text:span><text:span text:style-name="T2">(43/9) </text:span> [.........]ⲩⲱⲥ ⲁⲩⲱ ϣⲁⲥⲣ <text:line-break/><text:span text:style-name="T1"> </text:span><text:span text:style-name="T2">(43/10) </text:span> [.......‐ⲩ]ⲛⲧⲁⲥ ⲙⲙⲁⲩ ⲛ‐ <text:line-break/><text:span text:style-name="T1"> </text:span><text:span text:style-name="T2">(43/11) </text:span> [ⲛ ⲟⲩ]ⲛⲟⲩⲧⲉ ⲛ ϣ̣ⲁ ⲉⲛⲉϩ· ϣⲁⲥⲣ <text:line-break/><text:span text:style-name="T1"> </text:span><text:span text:style-name="T2">(43/12) </text:span> ϣ̣ⲃⲏ̣ⲣ ⲛ ϣⲱⲡ[ⲉ] ⲙⲛ ϩⲉⲛⲇ[ⲉⲙⲱ]ⲛ· <text:line-break/><text:span text:style-name="T1"> </text:span><text:span text:style-name="T2">(43/13) </text:span> [ⲡⲓ]ⲣⲱⲙⲉ ⲇⲉ ⲉⲧ’ϣⲟⲟⲡ’ ϩⲛ ϯ‐ <text:line-break/><text:span text:style-name="T1"> </text:span><text:span text:style-name="T2">(43/14) </text:span> [ⲡ]ⲁⲣⲟⲓⲕⲏ[ⲥ]ⲓ̣ⲥ· ⲉϣⲱⲡⲉ ⲇⲉ ⲉ‐ <text:line-break/><text:span text:style-name="T1"> </text:span><text:span text:style-name="T2">(43/15) </text:span> [ⲟⲩⲛ]ⲧⲁϥ ⲙⲙⲁⲩ ⲛ ⲟⲩϭⲓⲛⲉ ⲛⲧⲉ ϯ‐ <text:line-break/><text:span text:style-name="T1"> </text:span><text:span text:style-name="T2">(43/16) </text:span> [ⲙⲛ]ⲧⲙⲉ ⲛ̣[ϩ]ⲣⲁⲓ̈ ⲛϩⲏⲧϥ ⲉϥⲟⲩⲏ[ⲉ]‐ <text:line-break/><text:span text:style-name="T1"> </text:span><text:span text:style-name="T2">(43/17) </text:span> [ⲟⲩ] ⲁ̣ ⲛⲓϩⲃⲏⲩⲉ ⲛⲧⲉ ϩⲉⲛⲕⲟⲟⲩⲉ <text:line-break/><text:span text:style-name="T1"> </text:span><text:span text:style-name="T2">(43/18) </text:span> ⲉ̣ⲩϣⲟⲟⲡ’ ⲕ[ⲁⲕ]ⲱ̣ⲥ ⲛⲁⲓ̈ ⲉⲩϫ̣[ⲱ]‐ <text:line-break/><text:span text:style-name="T1"> </text:span><text:span text:style-name="T2">(43/19) </text:span> [ⲣ]ⲡ’· ʹ264ʹ264 ⲡⲓⲣⲱ[ⲙⲉ] ⲉⲧⲣ ⲙⲉⲧⲁ‐ <text:line-break/><text:span text:style-name="T1"> </text:span><text:span text:style-name="T2">(43/20) </text:span> [ⲛⲟⲓ] ⲉϣⲱ̣ⲉ ⲉ̣[ϥ]ϣⲁⲛⲕⲱ ⲛⲥⲱϥ <text:line-break/><text:span text:style-name="T1"> </text:span><text:span text:style-name="T2">(43/21) </text:span> [ⲛ] ⲛⲉⲧ’ⲙ[ⲟⲟⲩⲧ’] ⲛϥⲣ ⲉⲡⲓⲑⲩⲙⲓ <text:line-break/><text:span text:style-name="T1"> </text:span><text:span text:style-name="T2">(43/22) </text:span> [ⲛ] ⲛⲏ ⲉⲧ̣[ϣ]ⲟ[ⲟⲡ’]· ⲡⲓⲛⲟⲩⲥ ⲛⲛ ⲁ‐ <text:line-break/><text:span text:style-name="T1"> </text:span><text:span text:style-name="T2">(43/23) </text:span> [ⲧ]ⲙⲟⲩ ⲙⲛ ϯⲯⲩⲭⲏ ⲛⲛ ⲁⲧⲙⲟⲩ <text:line-break/><text:span text:style-name="T1"> </text:span><text:span text:style-name="T2">(43/24) </text:span> [.]ⲛ[..]ⲉ̣ϥϭⲉⲡⲏ ⲉⲧⲃⲏⲏⲧⲟⲩ ⲛ <text:line-break/><text:span text:style-name="T1"> </text:span><text:span text:style-name="T2">(43/25) </text:span> ϣⲟⲣⲡ’ ⲉϥⲉⲓⲣⲉ ⲛ ⲟⲩϣⲓ̣ⲛ̣ⲉ <text:line-break/><text:span text:style-name="T1"> </text:span><text:span text:style-name="T2">(43/26) </text:span> ⲉⲧⲃⲏⲧϥ ⲛⲧⲉ ϯⲡⲣⲁⲝⲓ[ⲥ ⲁ]ⲛ <text:line-break/><text:soft-page-break/><text:span text:style-name="T1"> </text:span><text:span text:style-name="T2">(43/27) </text:span> ⲁⲗ̣ⲗⲁ ⲛⲧⲉ ⲛⲓϩⲃⲏ̣ⲩ ⲉ[ⲃⲟ]ⲗ <text:line-break/><text:span text:style-name="T1"> </text:span><text:span text:style-name="T2">(43/28) </text:span> ⲅⲁⲣ ϩⲙ ⲡⲁⲓ̈ ϣⲁ̣ϥ̣[.]ⲓ̣ ⲛ ⲟ[... <text:line-break/><text:span text:style-name="T1"> </text:span><text:span text:style-name="T2">(43/29) </text:span> ⲉⲛⲛ[........]ⲟ[.....] ⲁ̣ⲩⲱ <text:line-break/><text:span text:style-name="T1"> </text:span><text:span text:style-name="T2">(43/30) </text:span> ]ϣⲁϣⲛ̣[ⲓ ]. <text:line-break/><text:span text:style-name="T1"> </text:span><text:span text:style-name="T2">(44/1) </text:span> [ ].ⲁ.. <text:line-break/><text:span text:style-name="T1"> </text:span><text:span text:style-name="T2">(44/2) </text:span> [......].[.......]ϣⲓⲃⲉ· <text:line-break/><text:span text:style-name="T1"> </text:span><text:span text:style-name="T2">(44/3) </text:span> [....].ⲟⲩ[......]ⲁⲧ’ⲃⲱⲗ <text:line-break/><text:span text:style-name="T1"> </text:span><text:span text:style-name="T2">(44/4) </text:span> [....]ⲗ̣· ⲁ[.......]ⲱⲥ ⲛⲁⲓ̈ <text:line-break/><text:span text:style-name="T1"> </text:span><text:span text:style-name="T2">(44/5) </text:span> [....]ⲩ[.....].ⲩ ⲧⲏⲣⲟⲩ <text:line-break/><text:span text:style-name="T1"> </text:span><text:span text:style-name="T2">(44/6) </text:span> [ ]. ⲛⲉ· ⲛⲧⲟⲟⲩ <text:line-break/><text:span text:style-name="T1"> </text:span><text:span text:style-name="T2">(44/7) </text:span> [ ]ⲧⲟⲟⲧⲟⲩ ⲧⲏ‐ <text:line-break/><text:span text:style-name="T1"> </text:span><text:span text:style-name="T2">(44/8) </text:span> [ ].ⲡ’ ⲛϩⲣⲁⲓ̈ ⲛ <text:line-break/><text:span text:style-name="T1"> </text:span><text:span text:style-name="T2">(44/9) </text:span> [ ]ⲁ̣· ⲉⲩϣⲟ.[ <text:line-break/><text:span text:style-name="T1"> </text:span><text:span text:style-name="T2">(44/10) </text:span> ⲧⲉ ⲉⲧϥϣⲟⲟⲡ’ ⲙ̣[ⲙⲟⲥ ..... <text:line-break/><text:span text:style-name="T1"> </text:span><text:span text:style-name="T2">(44/11) </text:span> ⲁϥϫⲓ ⲙ ⲡⲟⲩⲉⲓ̣ [..... <text:line-break/><text:span text:style-name="T1"> </text:span><text:span text:style-name="T2">(44/12) </text:span> ϩⲙ ⲙⲁ ⲛⲓⲙ ⲉⲁ[ϥ]ϣ[ⲱ]ⲡ̣ⲉ ⲛ̣ [ϩⲁ]‐ <text:line-break/><text:span text:style-name="T1"> </text:span><text:span text:style-name="T2">(44/13) </text:span> ⲡⲗⲟ̣ⲩⲛ ⲁⲩⲱ ⲛ̣ ⲟⲩⲁ ⲧⲟⲧⲉ ⲅⲁ̣ⲣ] <text:line-break/><text:span text:style-name="T1"> </text:span><text:span text:style-name="T2">(44/14) </text:span> ⲁ̣[ϥⲛ]ⲟ̣ⲩϩⲙ ⲛϭⲓ [ⲡ]ⲁ̣ⲓ̈ ⲉⲩⲛ ϣϭ̣[ⲟⲙ] <text:line-break/><text:span text:style-name="T1"> </text:span><text:span text:style-name="T2">(44/15) </text:span> ⲙⲙⲟϥ ⲉ ⲣ ⲭⲱⲣⲓⲛ ⲉⲃⲟⲗ ϩⲓⲧⲛ [ⲛⲁⲓ̈] <text:line-break/><text:span text:style-name="T1"> </text:span><text:span text:style-name="T2">(44/16) </text:span> ⲧⲏⲣⲟⲩ· ϣⲁϥϣⲱⲡⲉ ⲉⲛⲧ[.. <text:line-break/><text:span text:style-name="T1"> </text:span><text:span text:style-name="T2">(44/17) </text:span> ⲛⲁⲓ̈ ⲧⲏⲣⲟⲩ· ⲉϣⲱⲡ’ ⲉϥϣⲁ[ⲛⲟⲩ] <text:line-break/><text:span text:style-name="T1"> </text:span><text:span text:style-name="T2">(44/18) </text:span> ⲱϣ ⲡⲁⲗⲓⲛ ⲟⲛ ⲉ[ⲓ]ⲉ̣ ϥⲡⲱⲣ[ϫ ⲛ]‐ <text:line-break/><text:span text:style-name="T1"> </text:span><text:span text:style-name="T2">(44/19) </text:span> ⲥ[ⲁ]ⲃⲟⲗ ⲛ ⲛⲁⲓ̈ ⲧⲏⲣ̣ⲟⲩ· ⲁⲩⲱ ⲛ[ⲧⲟϥ] <text:line-break/><text:span text:style-name="T1"> </text:span><text:span text:style-name="T2">(44/20) </text:span> ⲛ̣ϥⲣ ⲁⲛⲁⲭⲱⲣⲓ̣[ⲛ ⲉ]ⲣⲟϥ ⲙⲁⲩⲁ[ⲁϥ] <text:line-break/><text:span text:style-name="T1"> </text:span><text:span text:style-name="T2">(44/21) </text:span> ⲡⲁⲓ̈ ⲅⲁⲣ ϣⲁ[ϥϣ]ⲱⲡⲉ [ⲛ] ⲛⲟⲩ[ⲧ]‐ <text:line-break/><text:span text:style-name="T1"> </text:span><text:span text:style-name="T2">(44/22) </text:span> ⲉ ⲁϥⲣ ⲁⲛⲁⲭⲱ̣[ⲣⲓ]ⲛ̣ ⲉ̣ ⲡⲛⲟⲩⲧⲉ <text:line-break/><text:span text:style-name="T1"> </text:span><text:span text:style-name="T2">(44/23) </text:span> ⲡⲁⲓ̈ ⲁⲛⲟⲕ ⲉⲧ[ⲥ]ⲱ̣ⲧⲙ ⲉⲣⲟϥ <text:line-break/><text:span text:style-name="T1"> </text:span><text:span text:style-name="T2">(44/24) </text:span> ⲁⲓ̈ⲉⲓⲛⲉ ⲉϩⲣⲁⲓ̈ ⲛ ⲟ̣ⲩ̣ⲥⲙ[ⲟ]ⲩ ⲙ ⲡ[ⲛⲟⲩ]‐ <text:line-break/><text:span text:style-name="T1"> </text:span><text:span text:style-name="T2">(44/25) </text:span> ⲧⲉ ⲉⲧⲟⲛϩ ⲁⲩⲱ ⲛⲛ ⲁⲧⲙ̣ⲓⲥⲉ [ⲉⲧⲛ]‐ <text:line-break/><text:span text:style-name="T1"> </text:span><text:span text:style-name="T2">(44/26) </text:span> ϩⲣⲁⲓ̈ ϩⲛ ⲟⲩⲙⲛⲧⲙⲉ ⲙⲛ ⲡⲓ̣ⲕ[ⲗ̅ⲥ̅] <text:line-break/><text:span text:style-name="T1"> </text:span><text:span text:style-name="T2">(44/27) </text:span> ⲛⲛ ⲁⲧⲙⲓⲥⲉ ⲙⲛ ⲡⲓⲡⲣⲱⲧⲟⲫⲁ̣[ⲛⲏⲥ] <text:line-break/><text:span text:style-name="T1"> </text:span><text:span text:style-name="T2">(44/28) </text:span> ⲛⲛ [ⲁ]ⲧⲛⲁⲩ ⲉⲣⲟϥ ⲛ ϩⲟⲟⲩⲧ’ ⲛ̣ ⲧ[ⲉ]‐ <text:line-break/><text:span text:style-name="T1"> </text:span><text:span text:style-name="T2">(44/29) </text:span> ⲗⲓⲟⲥ̣ ⲛ̣ ⲛⲟⲩⲥ ⲙⲛ ⲡⲓⲁⲧⲛⲁⲩ ⲉ̣‐ <text:line-break/><text:span text:style-name="T1"> </text:span><text:span text:style-name="T2">(44/30) </text:span> ⲣⲟϥ ⲛ̣ ⲁ̣ⲗⲟⲩ ⲛ ϣⲙⲧ’ϩⲟ̣[ⲟ]ⲩⲧ’ <text:line-break/><text:span text:style-name="T1"> </text:span><text:span text:style-name="T2">(44/31) </text:span> ⲙ[ⲛ ⲡⲓⲁ]ⲩⲧⲟⲅ̣[ⲉⲛⲏ]ⲥ ⲛ [ⲛⲟ]ⲩⲧⲉ̣ <text:line-break/><text:span text:style-name="T1"> </text:span><text:span text:style-name="T2">(45/1) </text:span> §ⲁⲩⲱ ⲡⲉϫⲁⲓ̈ ⲙ ⲡⲁⲗⲟⲩ ⲛⲧⲉ ⲡⲁⲗⲟⲩ <text:line-break/><text:span text:style-name="T1"> </text:span><text:span text:style-name="T2">(45/2) </text:span> ⲉⲧ’ⲕⲏ ⲛⲙⲙⲁⲓ̈ ⲏ̅ⲫ̅ⲏ̅ⲥ̅ⲏ̅ⲭ̅ ϫⲉⲩ‐ <text:line-break/><text:span text:style-name="T1"> </text:span><text:span text:style-name="T2">(45/3) </text:span> ⲛ ϭⲟⲙ ⲛ ⲧⲉⲕⲥⲟⲫⲓⲁ ⲉ ⲧⲁⲙⲟⲉⲓ ⲉ <text:line-break/><text:span text:style-name="T1"> </text:span><text:span text:style-name="T2">(45/4) </text:span> ⲡⲓϫⲱⲱⲣⲉ ⲉⲃⲟⲗ ⲛⲧⲉ ⲡⲣⲱⲙⲉ <text:line-break/><text:span text:style-name="T1"> </text:span><text:span text:style-name="T2">(45/5) </text:span> [ⲉ]ⲧ̣ⲟⲩ̣ⲛⲟ[ⲩ]ϩⲙ ⲙⲙⲟϥ· ⲁⲩⲱ ϫⲉ <text:line-break/><text:span text:style-name="T1"> </text:span><text:span text:style-name="T2">(45/6) </text:span> ⲛ̣[ⲓ]ⲙ ⲛ[ⲉ] ⲛ̣ⲏ [ⲉ]ⲧ’[ⲧ]ⲉϩ ⲉⲣⲟϥ· ⲁⲩⲱ <text:line-break/><text:span text:style-name="T1"> </text:span><text:span text:style-name="T2">(45/7) </text:span> ϫⲉ ⲛⲓⲙ ⲛⲉ̣ [ⲛⲏ ⲉ]ⲧ̣ⲡⲱϣ ⲙⲙⲟϥ <text:line-break/><text:span text:style-name="T1"> </text:span><text:span text:style-name="T2">(45/8) </text:span> ϫ[ⲉ]ⲕⲁⲁⲥ ⲉ̣[ⲩⲛ]ⲁⲉⲓⲙⲉ ⲛϭⲓ ⲛⲓⲥⲱ‐ <text:line-break/><text:span text:style-name="T1"> </text:span><text:span text:style-name="T2">(45/9) </text:span> ⲧ[ⲡ’] ⲉⲧⲟ̣ⲛ̣ϩ̣ [ⲁ]ⲩⲱ ⲧⲟⲧⲉ ⲁϥϫⲟⲟⲥ <text:line-break/><text:span text:style-name="T1"> </text:span><text:span text:style-name="T2">(45/10) </text:span> ⲛⲁ[ⲓ̈.....] ϩ̣ⲛ ⲟⲩ〈ⲟⲩ〉ⲱⲛϩ ⲉⲃⲟⲗ <text:line-break/><text:span text:style-name="T1"> </text:span><text:span text:style-name="T2">(45/11) </text:span> ⲛϭⲓ ⲡⲁⲗⲟ̣ⲩ ⲛⲧⲉ ⲡⲁⲗⲟⲩ ⲏ̣̅̅ⲫ̅ⲏ̅ⲥ̅ⲏ̅ⲕ̅ <text:line-break/><text:span text:style-name="T1"> </text:span><text:span text:style-name="T2">(45/12) </text:span> ϫⲉ ⲉϣⲱⲡⲉ ⲉϥϩϣⲁⲛⲣ ⲁ̣[ⲛⲁⲭ]ⲱ‐ <text:line-break/><text:soft-page-break/><text:span text:style-name="T1"> </text:span><text:span text:style-name="T2">(45/13) </text:span> ⲣ[ⲓ] ⲉⲣⲟϥ ⲙⲁⲩⲁⲁϥ ⲛ ⲟⲩⲙⲏⲏϣⲉ <text:line-break/><text:span text:style-name="T1"> </text:span><text:span text:style-name="T2">(45/14) </text:span> ⲛ̣ ⲥⲟⲡ’ ⲁⲩⲱ ⲛϥϣⲱⲡⲉ ⲙ ⲡⲕⲱ‐ <text:line-break/><text:span text:style-name="T1"> </text:span><text:span text:style-name="T2">(45/15) </text:span> [ⲧ]ⲉ ⲛ ϯⲅⲛⲱⲥⲓⲥ ⲛⲧⲉ ϩⲉⲛⲕⲟⲟⲩⲉ <text:line-break/><text:span text:style-name="T1"> </text:span><text:span text:style-name="T2">(45/16) </text:span> [ϣ]ⲁϥⲉⲓⲙⲉ ⲛϭⲓ ⲡⲓⲛⲟⲩⲥ ⲙⲛ ϯ‐ <text:line-break/><text:span text:style-name="T1"> </text:span><text:span text:style-name="T2">(45/17) </text:span> [ⲁⲣ]ⲭⲏ ⲛⲛ ⲁⲧⲙⲟⲩ· ⲧⲟⲧⲉ ⲟⲩ̣ⲛ‐ <text:line-break/><text:span text:style-name="T1"> </text:span><text:span text:style-name="T2">(45/18) </text:span> [ⲧ]ⲁϥ ⲙⲙⲁⲩ ⲛ ⲟⲩϣⲱⲱⲧ’ ϣ[ⲁ]ϥ̣‐ <text:line-break/><text:span text:style-name="T1"> </text:span><text:span text:style-name="T2">(45/19) </text:span> ⲕ̣ⲱⲧⲉ ⲅⲁⲣ ϩⲱⲱ̣[ϥ] ⲙ̣ⲛⲧⲁϥ ⲁⲩⲱ <text:line-break/><text:span text:style-name="T1"> </text:span><text:span text:style-name="T2">(45/20) </text:span> [ϣ]ⲁ̣ϥⲡⲱⲣϫ ⲛⲥ̣[ⲁ]ⲃⲟⲗ ⲙⲙⲟϥ ⲛϥ‐ <text:line-break/><text:span text:style-name="T1"> </text:span><text:span text:style-name="T2">(45/21) </text:span> [ⲁ]ϩⲉⲣⲁⲧϥ ⲛ ..[...] ⲛϥϣⲱⲡⲉ ⲛ‐ <text:line-break/><text:span text:style-name="T1"> </text:span><text:span text:style-name="T2">(45/22) </text:span> [ϩ]ⲣ̣ⲁⲓ̈ ϩⲛ ⲟⲩ[ϩⲟⲣ]ⲙⲏ ⲛ ϣⲙⲙⲟ· <text:line-break/><text:span text:style-name="T1"> </text:span><text:span text:style-name="T2">(45/23) </text:span> [ⲉ] ⲡⲙⲁ ⲛϥϣⲱⲡⲉ ⲛ ⲟⲩⲁ ϣⲁϥ‐ <text:line-break/><text:span text:style-name="T1"> </text:span><text:span text:style-name="T2">(45/24) </text:span> ⲉ̣ⲓ̣ⲛ̣[ⲉ] ϭ̣ⲉ ⲛ ⲟⲩⲙⲏⲏϣⲉ ⲙ ⲙⲟⲣ‐ <text:line-break/><text:span text:style-name="T1"> </text:span><text:span text:style-name="T2">(45/25) </text:span> [ⲫ]ⲏ̣[·] ⲁⲩⲱ ⲉϥϣⲁⲛⲣⲓⲕⲉ ϣⲁϥ‐ <text:line-break/><text:span text:style-name="T1"> </text:span><text:span text:style-name="T2">(45/26) </text:span> [ϣ]ⲱⲡⲉ ⲉϥϣⲓⲛⲉ ⲛⲥⲁ ⲛⲏ ⲉⲧⲉ <text:line-break/><text:span text:style-name="T1"> </text:span><text:span text:style-name="T2">(45/27) </text:span> [ⲛ]ⲥⲉϣⲟⲟⲡ’ ⲁⲛ· ⲁⲩⲱ ⲉ̣ϥϣⲁⲛ‐ <text:line-break/><text:span text:style-name="T1"> </text:span><text:span text:style-name="T2">(45/28) </text:span> ϩⲉ ⲉϩⲣⲁⲓ̈ ⲉ ⲛⲁⲓ̈ ϩⲛ ⲟⲩⲛⲟ̣ⲏⲙⲁ <text:line-break/><text:span text:style-name="T1"> </text:span><text:span text:style-name="T2">(45/29) </text:span> ⲁⲩⲱ ⲉⲙⲛ ϭ[ⲟ]ⲙ ⲛϥⲉⲓ̣[ʹ264]ⲙⲉ ⲉ‐ <text:line-break/><text:span text:style-name="T1"> </text:span><text:span text:style-name="T2">(45/30) </text:span> ⲣⲟⲟⲩ ⲛ ⲕⲉ[ⲣ]ⲏ̣ⲧⲉ· ⲉ̣[ⲓʹ264 ⲙ]ⲏⲧⲓ <text:line-break/><text:span text:style-name="T1"> </text:span><text:span text:style-name="T2">(46/1) </text:span> ⲛϥϫⲓ ⲙ ⲡⲟⲩⲟⲉⲓⲛ ϣⲁϥϣⲱⲡⲉ ⲛ <text:line-break/><text:span text:style-name="T1"> </text:span><text:span text:style-name="T2">(46/2) </text:span> ⲟⲩⲫⲩⲥⲓⲥ· ⲁⲩⲱ ⲙ ⲡⲉⲓ̈ⲣⲏⲧⲉ <text:line-break/><text:span text:style-name="T1"> </text:span><text:span text:style-name="T2">(46/3) </text:span> ϣⲁϥⲉⲓ ⲉϩⲣⲁⲓ̈ ⲉⲩϫⲡⲟ ⲉⲧⲃⲏⲏⲧϥ <text:line-break/><text:span text:style-name="T1"> </text:span><text:span text:style-name="T2">(46/4) </text:span> ⲁⲩⲱ ϣⲁϥⲣ ⲁⲧ’ϣⲁϫⲉ ⲉⲧ̣ⲃⲉ̣ ⲛ̣[ⲓ]‐ <text:line-break/><text:span text:style-name="T1"> </text:span><text:span text:style-name="T2">(46/5) </text:span> ⲙⲕⲟⲟϩ· ⲙⲛ ϯⲙⲛ[ⲧ]ⲁ̣ⲧⲛ [ⲁ]ⲣ̣ⲏ̣[ϫϥ] <text:line-break/><text:span text:style-name="T1"> </text:span><text:span text:style-name="T2">(46/6) </text:span> ⲛⲧⲉ ϯϩⲩⲗⲏ· ⲉ̣ⲩ̣[ⲛⲧ]ⲁϥ [ⲛ] ⲟⲩϭⲟ̣ⲙ <text:line-break/><text:span text:style-name="T1"> </text:span><text:span text:style-name="T2">(46/7) </text:span> ⲛ ϣⲁ ⲉⲛⲉϩ ⲙ̣[ⲙⲁⲩ ⲛ] ⲁⲧⲙⲟⲩ <text:line-break/><text:span text:style-name="T1"> </text:span><text:span text:style-name="T2">(46/8) </text:span> ϣⲁⲩⲥⲟⲛϩϥ ⲛϩ[ⲣⲁⲓ̈ ϩ]ⲙ ⲡⲓⲉⲓ ⲉ [ⲑⲏ] ⲛ‐ <text:line-break/><text:span text:style-name="T1"> </text:span><text:span text:style-name="T2">(46/9) </text:span> ⲧⲉ ⲡⲥⲱⲙⲁ· ϣⲁ[ⲩⲁⲓ]ⲧϥ ⲉϥⲟⲛ̣[ϩ] <text:line-break/><text:span text:style-name="T1"> </text:span><text:span text:style-name="T2">(46/10) </text:span> ⲁⲩⲱ ϣⲁⲩⲥⲟⲛϩ̣[ϥ ⲛ ⲟⲩⲟⲉⲓ]ϣ <text:line-break/><text:span text:style-name="T1"> </text:span><text:span text:style-name="T2">(46/11) </text:span> ⲛⲓⲙ ⲛϩⲣⲁⲓ̈ ϩⲛ ϩⲉⲛⲥⲛⲁⲩϩ ⲉⲩⲛⲁ‐ <text:line-break/><text:span text:style-name="T1"> </text:span><text:span text:style-name="T2">(46/12) </text:span> ϣⲧ’ ⲉ̣ⲩϭⲱϫⲉ ʹ264ʹ264ʹ264 ⲙ̣ⲙ̣ⲟϥ ⲉⲃⲟⲗ <text:line-break/><text:span text:style-name="T1"> </text:span><text:span text:style-name="T2">(46/13) </text:span> ϩⲓ[ⲧⲛ] ⲛ̣ⲓϥⲉ ⲛⲓⲙ ⲉⲧ’ϩⲟⲟⲩ· ϣⲁⲛ‐ <text:line-break/><text:span text:style-name="T1"> </text:span><text:span text:style-name="T2">(46/14) </text:span> ⲧϥⲁ[ⲓ]ⲧϥ ⲟⲛ ⲁⲩⲱ ⲛϥⲣ ⲁⲣϫⲓ ⲟⲛ̣ <text:line-break/><text:span text:style-name="T1"> </text:span><text:span text:style-name="T2">(46/15) </text:span> ⲉϣⲱⲡⲉ ϩⲣⲁⲓ̈ ⲛϩⲏⲧϥ· ⲉⲧⲃⲉ ⲡ[ⲁⲓ̈] <text:line-break/><text:span text:style-name="T1"> </text:span><text:span text:style-name="T2">(46/16) </text:span> ⲥⲉⲧⲏϣ ⲉϩⲣⲁⲓ̈ ⲉϫⲛ ⲡⲓⲟⲩϫⲁⲓ̈ ⲛ[ⲧⲉ] <text:line-break/><text:span text:style-name="T1"> </text:span><text:span text:style-name="T2">(46/17) </text:span> ⲛⲁⲓ̈· ⲁⲩⲱ ⲛⲁⲓ̈ϭⲟⲙ ⲛⲁⲓ̈ ⲥⲉϣⲟ[ⲟⲡ’] <text:line-break/><text:span text:style-name="T1"> </text:span><text:span text:style-name="T2">(46/18) </text:span> ϩⲙ ⲡⲓⲙⲁ· ⲁⲩⲱ ⲛϩⲣⲁ̣ⲓ̈ ϩⲛ ⲛⲓⲁⲩ̣[ⲧⲟ]‐ <text:line-break/><text:span text:style-name="T1"> </text:span><text:span text:style-name="T2">(46/19) </text:span> ⲅⲉ̣ⲛⲏⲥ ⲕⲁⲧⲁ ⲡⲟⲩ̣ⲁ ⲡⲟⲩⲁ ⲛⲧⲉ ⲛ[ⲓⲉ]‐ <text:line-break/><text:span text:style-name="T1"> </text:span><text:span text:style-name="T2">(46/20) </text:span> ⲱⲛ ⲥⲉⲁϩⲉⲣⲁ[ⲧⲟ]ⲩ̣ ⲛϭⲓ ϩⲉⲛⲉⲟⲟⲩ <text:line-break/><text:span text:style-name="T1"> </text:span><text:span text:style-name="T2">(46/21) </text:span> ϩⲓⲛⲁ ϫⲉ ⲉϥⲉⲛⲟ̣[ⲩ]ϩ̣ⲙ ⲛⲥⲁⲥⲡⲓⲣ ⲛⲁ̣[ⲓ̈] <text:line-break/><text:span text:style-name="T1"> </text:span><text:span text:style-name="T2">(46/22) </text:span> ⲛϭⲓ ⲡⲏ ⲉⲧⲙ ⲡ[ⲓⲙⲁ ⲛ]ⲓ̣ⲉⲟⲟⲩ ⲇⲉ ϩ[ⲉⲛ]‐ <text:line-break/><text:span text:style-name="T1"> </text:span><text:span text:style-name="T2">(46/23) </text:span> ⲛⲟⲏⲙⲁ ⲛⲉ ⲛ ⲧⲉⲗ̣[ⲓ]ⲟ̣ⲥ ⲉⲩⲟⲛϩ ⲉ ⲛ̣[ⲓ]‐ <text:line-break/><text:span text:style-name="T1"> </text:span><text:span text:style-name="T2">(46/24) </text:span> ϭⲟⲙ ⲛⲥⲉⲧⲁⲕⲟ 〈ⲁⲛ〉 ϫⲉ ϩⲉⲛⲧⲩⲡⲟⲥ̣ [ⲛⲉ] <text:line-break/><text:span text:style-name="T1"> </text:span><text:span text:style-name="T2">(46/25) </text:span> ⲛⲧⲉ ⲟⲩⲟⲩϫⲁⲓ̈· ⲉⲧⲉ ⲉϣⲁ̣ⲣ̣[ⲉ]ⲡ̣[ⲟⲩⲁ] <text:line-break/><text:span text:style-name="T1"> </text:span><text:span text:style-name="T2">(46/26) </text:span> ⲡⲟⲩⲁ ϫⲓⲧⲟⲩ ⲉϥⲉⲛⲟⲩϩⲙ ⲉϩⲣ[ⲁⲓ̈ ⲉ]‐ <text:line-break/><text:span text:style-name="T1"> </text:span><text:span text:style-name="T2">(46/27) </text:span> ⲣⲟⲟⲩ· ⲁⲩⲱ ⲉϥϫⲓ ⲧⲩⲡⲟⲥ· ⲉϥ‐ <text:line-break/><text:span text:style-name="T1"> </text:span><text:span text:style-name="T2">(46/28) </text:span> ϫⲓ ϭⲟⲙ ⲉⲃⲟⲗ ϩⲓⲧⲛ ⲡⲁⲓ̈ ⲡⲁⲓ̈· ⲁⲩ[ⲱ] <text:line-break/><text:span text:style-name="T1"> </text:span><text:span text:style-name="T2">(46/29) </text:span> ⲉⲩⲛⲧⲁ̣ϥ ⲙ ⲡⲓⲉⲟⲟⲩ ⲛ ⲟⲩⲃⲟⲏⲑⲟ[ⲥ] <text:line-break/><text:soft-page-break/><text:span text:style-name="T1"> </text:span><text:span text:style-name="T2">(46/30) </text:span> ⲙ ⲡⲓⲣ̣[ⲏ]ⲧⲉ ϣⲁϥⲥ̣[ⲓ]ⲛⲉ ⲙ ⲡⲓⲕⲟⲥⲙⲟ[ⲥ] <text:line-break/><text:span text:style-name="T1"> </text:span><text:span text:style-name="T2">(46/31) </text:span> ⲁⲩ[ⲱ ⲛⲓⲉ]ⲱⲛ [...]ⲙ· ⲁⲩⲱ ⲥⲉϣⲟ‐ <text:line-break/><text:span text:style-name="T1"> </text:span><text:span text:style-name="T2">(47/1) </text:span> ⲟⲡ’ ⲛϭⲓ ⲛⲓⲣⲉϥⲁⲣⲉϩ ⲛⲧⲉ ϯⲯⲩⲭⲏ <text:line-break/><text:span text:style-name="T1"> </text:span><text:span text:style-name="T2">(47/2) </text:span> ⲛⲛ ⲁⲧⲙⲟⲩ ⲅⲁ̅ⲙ̅ⲁ̅ⲗ̅ⲓ̅ⲏ̅ⲗ̅ ⲙⲛ <text:line-break/><text:span text:style-name="T1"> </text:span><text:span text:style-name="T2">(47/3) </text:span> ⲥ̅ⲧ̅ⲣ̅ⲉ̅ⲙ̅ⲯ̅ⲟ̅ⲩ̅ⲭ̅ⲟ̅ⲥ̅· ⲁⲩⲱ ⲁ̅ⲕⲣⲁⲙⲁⲥ̅ <text:line-break/><text:span text:style-name="T1"> </text:span><text:span text:style-name="T2">(47/4) </text:span> [ⲙ]ⲛ ⲗ̅ⲱ̣̅̅ⲏ̅ⲗ̅· ⲁⲩⲱ ⲙ̅ⲛⲏⲥⲓⲛⲟⲩⲥ̅· <text:line-break/><text:span text:style-name="T1"> </text:span><text:span text:style-name="T2">(47/5) </text:span> [ⲛⲁⲓ̈ ⲛⲓ]ⲡ̣̅̅ⲛ̅ⲁ̅ [ⲛ]ⲉ ⲛⲛ ⲁⲧⲙⲟⲩ· ⲓ̈ⲉ̅ⲥⲥⲉⲩⲥ̅ <text:line-break/><text:span text:style-name="T1"> </text:span><text:span text:style-name="T2">(47/6) </text:span> [ⲙ̅]̅ⲁ̣̅̅ⲍ̅ⲁ̣̅̅ⲣ̅ⲉ̅ⲩ̅[̅ⲥ̅] ⲓ̣̅̈ⲉ[ⲥ]ⲥ̣ⲉⲇⲉⲕⲉⲩⲥ̅· <text:line-break/><text:span text:style-name="T1"> </text:span><text:span text:style-name="T2">(47/7) </text:span> [.].ⲁϯ̣ⲧⲟⲩ [...] ⲛ̣ⲧⲉ ⲡⲓⲁⲗⲟⲩ ⲡⲉ <text:line-break/><text:span text:style-name="T1"> </text:span><text:span text:style-name="T2">(47/8) </text:span> [..]ⲱ̅ⲣ̣̅̅ ⲡⲁⲗ̣[ⲟ]ⲩ̣ ⲛⲧⲉ ⲡⲁⲗⲟⲩ· ⲁⲩⲱ <text:line-break/><text:span text:style-name="T1"> </text:span><text:span text:style-name="T2">(47/9) </text:span> .[..]..[....]ⲟⲕ· ⲟ̅ⲣ̅ⲙ̅ⲟ̅ⲥ̅ ⲇⲉ <text:line-break/><text:span text:style-name="T1"> </text:span><text:span text:style-name="T2">(47/10) </text:span> ⲡⲉ[......]ϣ ⲉϫⲛ ϯⲥⲡⲟⲣⲁ ⲉⲧⲟ‐ <text:line-break/><text:span text:style-name="T1"> </text:span><text:span text:style-name="T2">(47/11) </text:span> ⲛϩ· ⲕⲁⲙ[..]ⲏ̅ⲗ̅ ⲇⲉ ⲡⲉ ⲡⲓⲣⲉ̣ϥ̣ϯ ⲡ̅ⲛ̅ⲁ̅ <text:line-break/><text:span text:style-name="T1"> </text:span><text:span text:style-name="T2">(47/12) </text:span> ⲛⲏ ⲇⲉ ⲥ̣[ⲉ]ⲁϩ̣ⲉⲣⲁⲧⲟⲩ ⲛⲛⲁϩⲣ[ⲁⲩ] ⲥ̣ⲉ‐ <text:line-break/><text:span text:style-name="T1"> </text:span><text:span text:style-name="T2">(47/13) </text:span> ⲓ̈ⲥ̅ⲁ̅ⲩ̅ⲏ̅ⲗ̅ ⲙⲛ ⲁ̅ⲩⲇⲁⲏⲗ̅ ⲁⲩⲱ [ⲁ̅]ⲃⲣⲁⲥⲁⲝ̅ <text:line-break/><text:span text:style-name="T1"> </text:span><text:span text:style-name="T2">(47/14) </text:span> ⲛ̣ⲓ̣ⲁ̣ⲛ̣ⲧⲃⲁ ⲫ̅ⲁ̅ⲗ̅ⲉ̅ⲣ̅ⲓ̅ⲥ̅ ⲛⲙ ⲫ̅ⲁⲗⲥⲏⲥ̅ <text:line-break/><text:span text:style-name="T1"> </text:span><text:span text:style-name="T2">(47/15) </text:span> [ⲁⲩ]ⲱ ⲉ̅ⲩ̅ⲣ̅ⲓ̅ⲟ̅ⲥ̅· ⲛⲓⲣⲉϥⲁⲣⲉϩ ⲛⲧⲉ <text:line-break/><text:span text:style-name="T1"> </text:span><text:span text:style-name="T2">(47/16) </text:span> [ⲡⲓ]ⲉⲟⲟⲩ ⲥ̅ⲧ̅ⲏ̅ⲑ̅ⲉ̅ⲩ̅ⲥ̅ ⲙⲛ ⲑ̅ⲉⲟ̅‐ <text:line-break/><text:span text:style-name="T1"> </text:span><text:span text:style-name="T2">(47/17) </text:span> [ⲡ̅ⲉ̅]̅ⲙ̅ⲡ̅ⲧ̅ⲟ̅ⲥ̅ ⲙⲛ ⲉ̅ⲩⲣⲩⲙⲉⲛⲉⲩ̣ⲥ̅ <text:line-break/><text:span text:style-name="T1"> </text:span><text:span text:style-name="T2">(47/18) </text:span> ⲙ̣ⲛ ⲟ̅ⲗ̅ⲥ̅ⲏ̅ⲛ̅· ⲛⲓⲃⲟⲏⲑⲟⲥ ⲇⲉ ϩ[ⲛ] <text:line-break/><text:span text:style-name="T1"> </text:span><text:span text:style-name="T2">(47/19) </text:span> [ϩ]ⲱⲃ ⲛⲓⲙ ⲡⲉ ⲃ̅ⲁ̅[̅.̅.̅.̅]̅ⲙ̅ⲟ̅ⲥ̅· ⲙⲛ <text:line-break/><text:span text:style-name="T1"> </text:span><text:span text:style-name="T2">(47/20) </text:span> [.]ⲥ̅ⲱ̅ⲛ̅ ⲙⲛ ⲉ̅ⲓⲣ[.]ⲛ· ⲙⲛ ⲗ̅ⲁⲗⲁⲙⲉⲩⲥ̅ <text:line-break/><text:span text:style-name="T1"> </text:span><text:span text:style-name="T2">(47/21) </text:span> ⲙⲛ ⲉ̅ⲓ̅ⲇ̅ⲟ̅ⲙ̅ⲉ̅ⲛ̅ⲉ̅ⲩ̣̅̅ⲥ̅· ⲙⲛ ⲁ̅ⲩⲑⲣⲟⲩ̅‐ <text:line-break/><text:span text:style-name="T1"> </text:span><text:span text:style-name="T2">(47/22) </text:span> [ⲛ̅]̅ⲓ̅ⲟ̅ⲥ̅· ⲛⲓⲣⲉϥϯ ϩⲁⲡ’ ⲡⲉ ⲥ̅ⲩⲙⲫⲑⲁⲣ̅ <text:line-break/><text:span text:style-name="T1"> </text:span><text:span text:style-name="T2">(47/23) </text:span> [ⲁ]ⲩⲱ ⲉ̅ⲩ̅ⲕ̅ⲣ̅ⲉ̅ⲃ̅ⲱ̅ⲥ̅ ⲙⲛ ⲕ̅ⲉⲓⲗⲁⲣ̅· <text:line-break/><text:span text:style-name="T1"> </text:span><text:span text:style-name="T2">(47/24) </text:span> [ⲡ]ⲓ̣[ⲡⲁ]ⲣ̣ⲁ̣ⲗⲏⲙⲡⲧⲱⲣ ⲥ̅ⲁ̅ⲙ̅ⲃ̅ⲗ̅ⲱ̅· ⲛⲓ‐ <text:line-break/><text:span text:style-name="T1"> </text:span><text:span text:style-name="T2">(47/25) </text:span> [ⲁⲅ]ⲅ̣ⲉ̣ⲗⲟⲥ ⲛ ⲣⲉϥϫⲓ ⲙⲟⲉⲓⲧ’ ϩⲏⲧⲟⲩ <text:line-break/><text:span text:style-name="T1"> </text:span><text:span text:style-name="T2">(47/26) </text:span> [ⲛ] ⲛⲓϭⲏⲡⲉ ⲛ ⲕⲗⲟⲟⲗⲉ ⲥ̅ⲁ̅ⲫ̅ⲫ̅ⲱ̅ <text:line-break/><text:span text:style-name="T1"> </text:span><text:span text:style-name="T2">(47/27) </text:span> ⲙⲛ ⲑ̅ⲟ̅ⲩ̅ⲣ̅ⲱ̅· ʹ264ʹ264 ⲛⲁⲓ̈ ⲉⲧⲁϥϫⲟ‐ <text:line-break/><text:span text:style-name="T1"> </text:span><text:span text:style-name="T2">(47/28) </text:span> ⲟ̣ⲩ ⲁϥⲧⲁⲙⲟⲓ̈ ⲉ ⲛⲁⲓ̈ ⲧⲏⲣⲟⲩ ⲉⲧ’‐ <text:line-break/><text:span text:style-name="T1"> </text:span><text:span text:style-name="T2">(47/29) </text:span> ϣⲟⲟⲡ’ ϩⲛ ⲛⲓ̣ⲁ̣ⲩⲧⲟⲅⲉⲛ̣ⲏ̣ⲥ ⲛ‐ <text:line-break/><text:span text:style-name="T1"> </text:span><text:span text:style-name="T2">(47/30) </text:span> ⲛ ⲉⲱⲛ ⲁⲩⲱ̣ ⲛ̣ⲉⲩⲉ ⲛ̣ [ⲟⲩ]ⲟ̣ⲉⲓⲛ <text:line-break/><text:span text:style-name="T1"> </text:span><text:span text:style-name="T2">(48/1) </text:span> ⲧⲏⲣⲟⲩ ⲛ ϣⲁ ⲉⲛⲉϩ· ⲁⲩⲱ ⲛ ⲧⲉⲗⲓⲟⲥ̣ <text:line-break/><text:span text:style-name="T1"> </text:span><text:span text:style-name="T2">(48/2) </text:span> ⲉⲩϫⲏⲕ ⲉⲃⲟⲗ ⲛ ⲕⲁⲧⲁ ⲟⲩⲁ· ⲁⲩⲱ <text:line-break/><text:span text:style-name="T1"> </text:span><text:span text:style-name="T2">(48/3) </text:span> ⲁⲓ̈ⲛⲁⲩ ⲕⲁⲧⲁ ⲡⲟⲩⲁ ⲡ[ⲟ]ⲩⲁ ⲛⲧⲉ <text:line-break/><text:span text:style-name="T1"> </text:span><text:span text:style-name="T2">(48/4) </text:span> ⲛⲓⲉⲱⲛ ⲉⲩⲕⲁϩ ⲉϥⲟ[ⲛ]ϩ̣ ⲙⲛ̣ [ⲟⲩ]‐ <text:line-break/><text:span text:style-name="T1"> </text:span><text:span text:style-name="T2">(48/5) </text:span> ⲙⲟⲟⲩ ⲉϥⲟⲛϩ· ⲙ[ⲛ] ⲟⲩ[ⲁ]ⲏ̣[ⲣ ⲉϥⲉ]‐ <text:line-break/><text:span text:style-name="T1"> </text:span><text:span text:style-name="T2">(48/6) </text:span> ⲛ ⲟⲩⲟⲉⲓⲛ· ⲁⲩⲱ̣ [ⲟ]ⲩⲕ̣ⲱ̣ϩ[ⲧ’ ⲉⲧⲉ]‐ <text:line-break/><text:span text:style-name="T1"> </text:span><text:span text:style-name="T2">(48/7) </text:span> ⲙⲉϥⲣⲱⲕ̣[ϩ ⲛⲁⲓ̈ ⲧ]ⲏ̣ⲣⲟ̣ⲩ ⲉϩ[ⲉⲛ]‐ <text:line-break/><text:span text:style-name="T1"> </text:span><text:span text:style-name="T2">(48/8) </text:span> ϩⲁⲡⲗⲟⲩⲛ ⲛⲉ̣ [ⲁⲩ]ⲱ ⲛⲛ ⲁⲧ[ⲟⲩⲱ]‐ <text:line-break/><text:span text:style-name="T1"> </text:span><text:span text:style-name="T2">(48/9) </text:span> ⲧⲃ ⲉⲃⲟⲗ· ⲙⲛ ϩ[ⲉⲛⲍⲱⲟⲛ ⲛϩ]ⲁ̣ <text:line-break/><text:span text:style-name="T1"> </text:span><text:span text:style-name="T2">(48/10) </text:span> ⲡⲗⲟⲩⲛ ⲁⲩⲱ [ⲛ ϣⲁ ⲉⲛ]ⲉ̣ϩ <text:line-break/><text:span text:style-name="T1"> </text:span><text:span text:style-name="T2">(48/11) </text:span> ⲉⲩⲛⲧⲁⲩ ⲛ ⲟⲩⲥ.[...] ⲛ̣ ⲟⲩⲙⲏ‐ <text:line-break/><text:span text:style-name="T1"> </text:span><text:span text:style-name="T2">(48/12) </text:span> ⲏ̣ϣⲉ ⲛ ⲣⲏⲧⲉ· ⲙⲛ̣ ϩ[ⲉ]ⲛϣⲏⲛ <text:line-break/><text:span text:style-name="T1"> </text:span><text:span text:style-name="T2">(48/13) </text:span> [ⲉ]ⲙⲁⲩⲧⲁⲕⲟ ⲛ ⲟⲩⲙⲏⲏϣⲉ <text:line-break/><text:span text:style-name="T1"> </text:span><text:span text:style-name="T2">(48/14) </text:span> ⲛ ⲣⲏⲧⲉ· ⲙⲛ ϩⲉⲛⲛⲧⲏϭ ⲟ[ⲛ]ⲙ̣ <text:line-break/><text:span text:style-name="T1"> </text:span><text:span text:style-name="T2">(48/15) </text:span> ⲡⲉⲓ̈ⲣⲏⲧⲉ ⲙⲛ ⲛⲁⲓ̈ ⲧⲏⲣⲟⲩ ⲙ[ⲛ] <text:line-break/><text:soft-page-break/><text:span text:style-name="T1"> </text:span><text:span text:style-name="T2">(48/16) </text:span> ⲟⲩⲕⲁⲣⲡⲟⲥ ⲉⲙⲁϥⲧⲁⲕⲟ ⲙ[ⲛ] <text:line-break/><text:span text:style-name="T1"> </text:span><text:span text:style-name="T2">(48/17) </text:span> ϩⲉⲛⲣⲱⲙⲉ ⲉⲩⲟⲛϩ ⲙⲛ ⲉⲓⲇ[ⲟⲥ] <text:line-break/><text:span text:style-name="T1"> </text:span><text:span text:style-name="T2">(48/18) </text:span> ⲛ̣ⲓⲙ· ⲙⲛ ϩⲉⲛⲯⲩⲭⲏ ⲛⲛ ⲁⲧⲙ[ⲟⲩ] <text:line-break/><text:span text:style-name="T1"> </text:span><text:span text:style-name="T2">(48/19) </text:span> ⲁⲩⲱ ⲙⲟⲣ[ⲫ]ⲏ ⲛⲓⲙ ⲙⲛ ⲉⲓⲇⲟ̣[ⲥ] <text:line-break/><text:span text:style-name="T1"> </text:span><text:span text:style-name="T2">(48/20) </text:span> ⲛⲓⲙ ⲛⲧⲉ ⲟⲩ̣ⲛ̣ⲟⲩⲥ· ⲙⲛ ϩⲉⲛ‐ <text:line-break/><text:span text:style-name="T1"> </text:span><text:span text:style-name="T2">(48/21) </text:span> ⲛⲟⲩⲧⲉ ⲛ ⲧⲁⲡⲙⲁⲙⲉ· ⲙⲛ <text:line-break/><text:span text:style-name="T1"> </text:span><text:span text:style-name="T2">(48/22) </text:span> ϩⲉⲛⲁⲅⲅⲉⲗⲟⲥ ⲉⲩϣⲟⲟⲡ’ ϩ[ⲛ] <text:line-break/><text:span text:style-name="T1"> </text:span><text:span text:style-name="T2">(48/23) </text:span> ⲟⲩⲛⲟϭ ⲛⲛ ⲉⲟⲟⲩ· ⲙⲛ ⲟⲩ‐ <text:line-break/><text:span text:style-name="T1"> </text:span><text:span text:style-name="T2">(48/24) </text:span> ⲥⲱⲙⲁ ⲉⲙⲁⲩⲃⲱⲗ ⲉⲃⲟⲗ [ⲙⲛ] <text:line-break/><text:span text:style-name="T1"> </text:span><text:span text:style-name="T2">(48/25) </text:span> ⲟⲩϫⲡⲟ ⲛⲛ ⲁⲧⲙⲓⲥⲉ ⲙⲛ ⲟⲩ‐ <text:line-break/><text:span text:style-name="T1"> </text:span><text:span text:style-name="T2">(48/26) </text:span> ⲉⲥⲑⲏⲥⲓⲥ ⲛⲛ ⲁⲧ’ⲕⲓⲙ· ⲁⲩⲱ̣ <text:line-break/><text:span text:style-name="T1"> </text:span><text:span text:style-name="T2">(48/27) </text:span> ⲛⲉϥⲙⲙⲁⲩ ⲟⲛ ⲡⲉ ⲛϭⲓ ⲡⲏ ⲉ̣ⲧ̣‐ <text:line-break/><text:span text:style-name="T1"> </text:span><text:span text:style-name="T2">(48/28) </text:span> ϫⲓ ⲙⲕⲁϩ ⲉϥⲉ ⲛ̣ ⲁⲧ’ϫⲓ ⲙⲕⲁϩ· <text:line-break/><text:span text:style-name="T1"> </text:span><text:span text:style-name="T2">(48/29) </text:span> §ⲛⲉⲩ̣ϭⲟⲙ ⲅⲁ[ⲣ] ⲡ̣ⲉ ⲛⲧⲉ ⲟⲩϭ̣ⲟ̣ⲙ· <text:line-break/><text:span text:style-name="T1"> </text:span><text:span text:style-name="T2">(49/1) </text:span> [ ].ⲁ.. <text:line-break/><text:span text:style-name="T1"> </text:span><text:span text:style-name="T2">(49/2) </text:span> [......].[.......]ϣⲓⲃⲉ· <text:line-break/><text:span text:style-name="T1"> </text:span><text:span text:style-name="T2">(49/3) </text:span> [....].ⲟⲩ[......]ⲁⲧ’ⲃⲱⲗ <text:line-break/><text:span text:style-name="T1"> </text:span><text:span text:style-name="T2">(49/4) </text:span> [....]ⲗ̣· ⲁ[.......]ⲱⲥ ⲛⲁⲓ̈ <text:line-break/><text:span text:style-name="T1"> </text:span><text:span text:style-name="T2">(49/5) </text:span> [....]ⲩ[.....].ⲩ ⲧⲏⲣⲟⲩ <text:line-break/><text:span text:style-name="T1"> </text:span><text:span text:style-name="T2">(49/6) </text:span> [ ]. ⲛⲉ· ⲛⲧⲟⲟⲩ <text:line-break/><text:span text:style-name="T1"> </text:span><text:span text:style-name="T2">(49/7) </text:span> [ ]ⲧⲟⲟⲧⲟⲩ ⲧⲏ‐ <text:line-break/><text:span text:style-name="T1"> </text:span><text:span text:style-name="T2">(49/8) </text:span> [ ].ⲡ’ ⲛϩⲣⲁⲓ̈ ⲛ <text:line-break/><text:span text:style-name="T1"> </text:span><text:span text:style-name="T2">(49/9) </text:span> [ ]ⲁ̣· ⲉⲩϣⲟ.[ <text:line-break/><text:span text:style-name="T1"> </text:span><text:span text:style-name="T2">(49/10) </text:span> [ ]ϣ̣ⲱⲡⲉ [.].[ <text:line-break/><text:span text:style-name="T1"> </text:span><text:span text:style-name="T2">(49/11) </text:span> [ ]ⲉ ⲛ ⲛⲉ̣[ <text:line-break/><text:span text:style-name="T1"> </text:span><text:span text:style-name="T2">(49/12) </text:span> (Lines 12 and following do not survive) <text:line-break/><text:span text:style-name="T1"> </text:span><text:span text:style-name="T2">(50/1) </text:span> ⲛⲧⲉ[ <text:line-break/><text:span text:style-name="T1"> </text:span><text:span text:style-name="T2">(50/2) </text:span> ⲣⲟⲩ.[....]ⲛ̣ ϩ̣ⲁⲡⲗ̣[ <text:line-break/><text:span text:style-name="T1"> </text:span><text:span text:style-name="T2">(50/3) </text:span> ⲛ ⲧⲉⲗⲓ̣[ⲟⲥ........]ⲉ.[ <text:line-break/><text:span text:style-name="T1"> </text:span><text:span text:style-name="T2">(50/4) </text:span> ⲛ ϣⲁ ⲉⲛ[ⲉϩ .....]ⲟ.[ <text:line-break/><text:span text:style-name="T1"> </text:span><text:span text:style-name="T2">(50/5) </text:span> ⲛ ⲉⲱⲛ ⲛ[ <text:line-break/><text:span text:style-name="T1"> </text:span><text:span text:style-name="T2">(50/6) </text:span> ⲡⲉ ⲁⲩⲱ ⲡ[ <text:line-break/><text:span text:style-name="T1"> </text:span><text:span text:style-name="T2">(50/7) </text:span> ϫⲓ ϭⲟⲙ ⲉⲃ[ⲟⲗ <text:line-break/><text:span text:style-name="T1"> </text:span><text:span text:style-name="T2">(50/8) </text:span> ⲁ̣ⲩⲱ ⲛⲉⲩ[ <text:line-break/><text:span text:style-name="T1"> </text:span><text:span text:style-name="T2">(50/9) </text:span> [ϩ]ⲛ ⲟⲩⲙⲛⲧ’[ <text:line-break/><text:span text:style-name="T1"> </text:span><text:span text:style-name="T2">(50/10) </text:span> [.]ⲣ[.] ⲅ̣ⲁⲣ ϣ[ <text:line-break/><text:span text:style-name="T1"> </text:span><text:span text:style-name="T2">(50/11) </text:span> [..].ⲩ ⲁⲛ· [ <text:line-break/><text:span text:style-name="T1"> </text:span><text:span text:style-name="T2">(50/12) </text:span> (Lines 12 and following do not survive) <text:line-break/><text:span text:style-name="T1"> </text:span><text:span text:style-name="T2">(51/1) </text:span> [ ]ⲟϥ ϩⲛ <text:line-break/><text:span text:style-name="T1"> </text:span><text:span text:style-name="T2">(51/2) </text:span> [ ]ⲑ̅ⲟ̅ⲣ̅ⲥ̅ⲟ̅.̅.̅ⲥ̅ <text:line-break/><text:span text:style-name="T1"> </text:span><text:span text:style-name="T2">(51/3) </text:span> [ ]ⲛⲟⲩⲥⲓⲅⲏ <text:line-break/><text:span text:style-name="T1"> </text:span><text:span text:style-name="T2">(51/4) </text:span> [ ⲙ]ⲙⲟϥ ⲡⲉ <text:line-break/><text:span text:style-name="T1"> </text:span><text:span text:style-name="T2">(51/5) </text:span> [ ].ⲡ̣ⲉ ⲡⲉ ⲡⲛⲟⲩ‐ <text:line-break/><text:span text:style-name="T1"> </text:span><text:span text:style-name="T2">(51/6) </text:span> [ⲧⲉ ]. ⲛⲉⲛⲥⲙⲟⲩ <text:line-break/><text:span text:style-name="T1"> </text:span><text:span text:style-name="T2">(51/7) </text:span> [ ]ⲛ ⲡⲓ̅ⲅ̅ⲉ̅ⲣ̅ⲁ̅ⲇ̅ⲁ̅ⲙ̅ⲁ̣̅̅[ <text:line-break/><text:span text:style-name="T1"> </text:span><text:span text:style-name="T2">(51/8) </text:span> [ ]..ⲁⲁⲩ ⲛⲧⲉ ⲛ̣[. <text:line-break/><text:span text:style-name="T1"> </text:span><text:span text:style-name="T2">(51/9) </text:span> [ ]ⲧⲛ ⲧⲉ ϯⲉⲟ[ⲟⲩ] <text:line-break/><text:soft-page-break/><text:span text:style-name="T1"> </text:span><text:span text:style-name="T2">(51/10) </text:span> [ ]ⲡⲉⲛⲟ[ <text:line-break/><text:span text:style-name="T1"> </text:span><text:span text:style-name="T2">(51/11) </text:span> [ ]ⲙⲁⲁⲩ[ <text:line-break/><text:span text:style-name="T1"> </text:span><text:span text:style-name="T2">(51/12) </text:span> [.......] ⲙⲛ ⲡⲗ̅ⲏ̅ⲥ̅ⲓ̅ⲑ̅ⲉ̅ⲁ̅ <text:line-break/><text:span text:style-name="T1"> </text:span><text:span text:style-name="T2">(51/13) </text:span> [ⲧⲙⲁⲁⲩ] ⲛⲧⲉ ⲛⲓⲁⲅⲅⲉⲗⲟⲥ ⲙⲛ <text:line-break/><text:span text:style-name="T1"> </text:span><text:span text:style-name="T2">(51/14) </text:span> [ⲡⲓϣⲏⲣ]ⲉ ⲛⲧⲉ ⲁ̅ⲇ̅ⲁ̅ⲙ̅ⲁ̅ⲥ̅ ⲥ̅ⲏ[ⲑ̅] <text:line-break/><text:span text:style-name="T1"> </text:span><text:span text:style-name="T2">(51/15) </text:span> [ⲉⲙⲙⲁ]ⲭ̣ⲁ ⲥ̅ⲏ̅ⲑ̅ ⲡⲓⲱⲧ’ ⲛⲧ[ⲉ] <text:line-break/><text:span text:style-name="T1"> </text:span><text:span text:style-name="T2">(51/16) </text:span> [ϯⲅⲉⲛ]ⲉⲁ ⲛⲛ ⲁⲧ’ⲕⲓⲙ ⲙⲛ̣[.. <text:line-break/><text:span text:style-name="T1"> </text:span><text:span text:style-name="T2">(51/17) </text:span> [ⲡⲓϥⲧ]ⲟⲟⲩ ⲙ ⲫ[ⲱ]ⲥⲧⲏⲣ ⲁ̅ⲣ̅ⲙ̣̅̅[̅ⲟ̅ⲍ̅ⲏ̅ⲥ̅] <text:line-break/><text:span text:style-name="T1"> </text:span><text:span text:style-name="T2">(51/18) </text:span> [ⲱ̅ⲣ̅ⲟ̅ⲓ̅̈̅ⲁ̅]̅ⲏ̅ⲗ̅ ⲛ̅ⲇⲁⲩⲉⲓⲑⲉ̅· ⲏ̅ⲗⲏⲗ̣ⲏⲑ̅· <text:line-break/><text:span text:style-name="T1"> </text:span><text:span text:style-name="T2">(51/19) </text:span> [......] ⲁⲛⲥⲙⲟⲩ ⲕⲁⲧⲁ ⲣⲁⲛ· <text:line-break/><text:span text:style-name="T1"> </text:span><text:span text:style-name="T2">(51/20) </text:span> [.....] ⲛⲁⲩ ⲉⲣⲟϥ ⲡⲓⲣⲉϥⲁⲙⲁϩ‐ <text:line-break/><text:span text:style-name="T1"> </text:span><text:span text:style-name="T2">(51/21) </text:span> [ⲧⲉ ⲙ ⲡⲉ]ⲟⲟⲩ ⲡⲁⲗⲟⲩ ⲛ ϣⲙⲧ’‐ <text:line-break/><text:span text:style-name="T1"> </text:span><text:span text:style-name="T2">(51/22) </text:span> [.....] ⲛ ϣⲙⲧ’ϩⲟⲟⲩⲧ’ ⲛ <text:line-break/><text:span text:style-name="T1"> </text:span><text:span text:style-name="T2">(51/23) </text:span> [....]ⲟ̣ⲩⲙⲛⲧ’ⲛⲟϭ ⲉⲛϫⲱ <text:line-break/><text:span text:style-name="T1"> </text:span><text:span text:style-name="T2">(51/24) </text:span> [ⲙⲙⲟ]ⲥ̣ ϫⲉ ⲛⲧⲕⲟⲩⲁ ⲛⲧⲕ‐ <text:line-break/><text:span text:style-name="T1"> </text:span><text:span text:style-name="T2">(51/25) </text:span> [ⲟⲩⲁ ⲛ]ⲧⲕ ⲟⲩⲁ ⲡⲓⲁⲗⲟⲩ <text:line-break/><text:span text:style-name="T1"> </text:span><text:span text:style-name="T2">(52/1) </text:span> ⲛⲧ̣[ⲉ ⲡⲓⲁⲗⲟⲩ <text:line-break/><text:span text:style-name="T1"> </text:span><text:span text:style-name="T2">(52/2) </text:span> ⲓ̈ⲁ̅ⲧ̅ⲟ̣̅̅[ <text:line-break/><text:span text:style-name="T1"> </text:span><text:span text:style-name="T2">(52/3) </text:span> ϣⲟⲟ[ⲡ’ <text:line-break/><text:span text:style-name="T1"> </text:span><text:span text:style-name="T2">(52/4) </text:span> ⲉⲁⲥ ⲉ̅.[ <text:line-break/><text:span text:style-name="T1"> </text:span><text:span text:style-name="T2">(52/5) </text:span> ⲙ ⲙⲟⲏ[ ⲛ]‐ <text:line-break/><text:span text:style-name="T1"> </text:span><text:span text:style-name="T2">(52/6) </text:span> ⲧⲕⲟⲩⲁ ⲛⲧ̣[ⲕⲟⲩⲁ <text:line-break/><text:span text:style-name="T1"> </text:span><text:span text:style-name="T2">(52/7) </text:span> ⲥ̣ⲉ̅ⲙ̅ⲉ̅ⲗ̅ⲉ̅ⲗ̅ [ <text:line-break/><text:span text:style-name="T1"> </text:span><text:span text:style-name="T2">(52/8) </text:span> ⲧ̣ⲉ̅ⲗ̅ⲙ̅ⲁ̅ⲭ̅ⲁ̅ⲏ̣̅̅[ <text:line-break/><text:span text:style-name="T1"> </text:span><text:span text:style-name="T2">(52/9) </text:span> ⲱ̅ⲙ̅ⲱ̅ⲑ̅ⲉ̅ⲙ̅[ <text:line-break/><text:span text:style-name="T1"> </text:span><text:span text:style-name="T2">(52/10) </text:span> [ϩ]ⲟ̣[ⲟ]ⲩⲧ’ ⲡ[ <text:line-break/><text:span text:style-name="T1"> </text:span><text:span text:style-name="T2">(52/11) </text:span> [..]ⲉϥϫⲡ[ⲟ ⲡⲓⲣⲉϥⲁ]‐ <text:line-break/><text:span text:style-name="T1"> </text:span><text:span text:style-name="T2">(52/12) </text:span> ⲙⲁϩⲧⲉ ⲙ ⲡⲉ̣[ⲟⲟⲩ <text:line-break/><text:span text:style-name="T1"> </text:span><text:span text:style-name="T2">(52/13) </text:span> ϣ ⲟⲩⲁϣϥ ⲡⲏ ⲉⲧⲛ[ <text:line-break/><text:span text:style-name="T1"> </text:span><text:span text:style-name="T2">(52/14) </text:span> ⲡⲁⲛⲧⲉⲗⲓⲟⲥ ⲡⲁⲛ[ <text:line-break/><text:span text:style-name="T1"> </text:span><text:span text:style-name="T2">(52/15) </text:span> ⲧⲏⲣⲟⲩ·ʹ264 ⲁ̅ⲕ̅ⲣ̅ⲱ̅ⲛ̅ [ <text:line-break/><text:span text:style-name="T1"> </text:span><text:span text:style-name="T2">(52/16) </text:span> ⲡ̣ⲓϣⲙⲧ’ϩⲟⲟⲩⲧ’ ⲁⲁ[ <text:line-break/><text:span text:style-name="T1"> </text:span><text:span text:style-name="T2">(52/17) </text:span> ⲱⲱⲱⲱⲱⲃʹ269ⲧⲣⲉⲓⲥⲉ̣[ <text:line-break/><text:span text:style-name="T1"> </text:span><text:span text:style-name="T2">(52/18) </text:span> ⲛⲧⲕⲟⲩⲡ̅ⲛ̅ⲁ̅ ⲉⲃⲟⲗ ϩⲛ [ⲟⲩ]‐ <text:line-break/><text:span text:style-name="T1"> </text:span><text:span text:style-name="T2">(52/19) </text:span> ⲡ̅ⲛ̅ⲁ̅· ⲛ̅ⲧⲕ̅〈ⲟⲩ〉ⲟⲩⲟⲉⲓⲛ ⲉ̣[ⲃⲟⲗ] <text:line-break/><text:span text:style-name="T1"> </text:span><text:span text:style-name="T2">(52/20) </text:span> ϩⲛ 〈ⲟⲩ〉ⲟⲩⲟⲉⲓⲛ· ⲛⲧⲕ[ⲟⲩⲥⲓⲅⲏ] <text:line-break/><text:span text:style-name="T1"> </text:span><text:span text:style-name="T2">(52/21) </text:span> ⲉⲃⲟⲗ ϩⲛ ⲟⲩⲥⲓⲅⲏ· ⲛ̣[ⲧⲕⲟⲩ]‐ <text:line-break/><text:span text:style-name="T1"> </text:span><text:span text:style-name="T2">(52/22) </text:span> ⲉⲛⲛⲟⲓⲁ ⲉⲃⲟⲗ ϩⲛ ⲟ̣[ⲩⲉⲛ]‐ <text:line-break/><text:span text:style-name="T1"> </text:span><text:span text:style-name="T2">(52/23) </text:span> ⲛⲟⲓⲁ ⲡϣⲏⲣⲉ ⲛⲧ̣[ⲉ ⲡⲛⲟⲩ]‐ <text:line-break/><text:span text:style-name="T1"> </text:span><text:span text:style-name="T2">(52/24) </text:span> ⲧⲉ ⲡⲛⲟⲩⲧⲉ ⲍ̅ ⲡ̅{2̅ⲩ}2[.. <text:line-break/><text:span text:style-name="T1"> </text:span><text:span text:style-name="T2">(52/25) </text:span> ʹ266ⲱ̅ʹ267 ⲙⲁⲣⲛϫⲟⲟϥ [ <text:line-break/><text:span text:style-name="T1"> </text:span><text:span text:style-name="T2">(53/1) </text:span> [ ]ϥ· <text:line-break/><text:span text:style-name="T1"> </text:span><text:span text:style-name="T2">(53/2) </text:span> [ ]ⲟϥ <text:line-break/><text:span text:style-name="T1"> </text:span><text:span text:style-name="T2">(53/3) </text:span> [ ]ⲛϫⲟ <text:line-break/><text:span text:style-name="T1"> </text:span><text:span text:style-name="T2">(53/4) </text:span> [.........]ϣⲁϫⲉ <text:line-break/><text:span text:style-name="T1"> </text:span><text:span text:style-name="T2">(53/5) </text:span> [.........·ⲛⲉ ϯⲛⲟⲩ̣[ <text:line-break/><text:span text:style-name="T1"> </text:span><text:span text:style-name="T2">(53/6) </text:span> [.........] ⲙⲛ ϯⲛⲟ̣[ <text:line-break/><text:soft-page-break/><text:span text:style-name="T1"> </text:span><text:span text:style-name="T2">(53/7) </text:span> [.......]ⲟ̣ⲩⲧⲉ ⲉⲃⲟ[ⲗ <text:line-break/><text:span text:style-name="T1"> </text:span><text:span text:style-name="T2">(53/8) </text:span> [.......]ⲩ̣ⲥⲟⲡ’ ⲁⲛ ⲥⲙ[ <text:line-break/><text:span text:style-name="T1"> </text:span><text:span text:style-name="T2">(53/9) </text:span> [.......]ⲓ̣ⲁ̣ⲧⲛⲁⲩ ⲉⲣⲟ̣[%1 <text:line-break/><text:span text:style-name="T1"> </text:span><text:span text:style-name="T2">(53/10) </text:span> [.......ⲃ̅]̅ⲁ̣̅̅ⲣ̅ⲃ̅ⲏ̅ⲗ̅[̅ⲱ̅ <text:line-break/><text:span text:style-name="T1"> </text:span><text:span text:style-name="T2">(53/11) </text:span> [.......] ⲡⲓⲁⲧ’[ <text:line-break/><text:span text:style-name="T1"> </text:span><text:span text:style-name="T2">(53/12) </text:span> [.....] ⲡⲓⲡ̅ⲣ̅ⲱ̅ⲛ̅ⲏ̅ⲥ̅ ⲛ <text:line-break/><text:span text:style-name="T1"> </text:span><text:span text:style-name="T2">(53/13) </text:span> [ϣⲙⲧ’]ϩⲟⲟⲩⲧ’ ⲙⲛ ⲧⲁⲛⲓⲉⲟ‐ <text:line-break/><text:span text:style-name="T1"> </text:span><text:span text:style-name="T2">(53/14) </text:span> [ⲟⲩ ⲧⲏ]ⲣⲟⲩ ⲓ̈ⲟ̅ⲩ̅ⲏ̅ⲗ̅· ⲁⲩⲱ <text:line-break/><text:span text:style-name="T1"> </text:span><text:span text:style-name="T2">(53/15) </text:span> [ⲉⲧⲁⲓ̈]ϫⲱⲕⲙ ⲙ ⲡⲙⲉϩϯⲟⲩ <text:line-break/><text:span text:style-name="T1"> </text:span><text:span text:style-name="T2">(53/16) </text:span> [ⲛ ⲥⲟ]ⲡ’ ⲉ ⲡⲣⲁⲛ ⲛⲧⲉ ⲡⲓⲁⲩ‐ <text:line-break/><text:span text:style-name="T1"> </text:span><text:span text:style-name="T2">(53/17) </text:span> [ⲧⲟ]ⲅ̣ⲉⲛⲏⲥ ⲉⲃⲟⲗ ϩⲓⲧⲟⲟⲧ[ⲟⲩ] <text:line-break/><text:span text:style-name="T1"> </text:span><text:span text:style-name="T2">(53/18) </text:span> ⲛ ⲛ]ⲉⲓ̈ϭⲟⲙ ⲛⲉⲓ̈ϭⲟⲙ ⲁⲉⲓ‐ <text:line-break/><text:span text:style-name="T1"> </text:span><text:span text:style-name="T2">(53/19) </text:span> [ϣ]ⲱ̣ⲡⲉ ⲛⲛ ⲟⲩⲛⲟⲩⲧⲉ <text:line-break/><text:span text:style-name="T1"> </text:span><text:span text:style-name="T2">(53/20) </text:span> [ⲁⲓ̈ⲁϩⲉ]ⲣ̣ⲁⲧ’ ϩⲓϫⲛ ⲡⲓⲙⲉϩϯ‐ <text:line-break/><text:span text:style-name="T1"> </text:span><text:span text:style-name="T2">(53/21) </text:span> [ⲟⲩ ⲛⲛ] ⲉⲱⲛ ⲛ ϭⲱⲣϭ ⲛⲧⲉ <text:line-break/><text:span text:style-name="T1"> </text:span><text:span text:style-name="T2">(53/22) </text:span> [ⲛⲁⲓ̈ ⲧ]ⲏ̣ⲣⲟⲩ· ⲁⲉⲓⲛⲁⲩ ⲉ ⲛⲁ‐ <text:line-break/><text:span text:style-name="T1"> </text:span><text:span text:style-name="T2">(53/23) </text:span> [ⲡⲓⲁⲩ]ⲧⲟⲅⲉⲛⲏⲥ ⲧⲏⲣⲟⲩ <text:line-break/><text:span text:style-name="T1"> </text:span><text:span text:style-name="T2">(53/24) </text:span> [ⲛⲏ ⲉ]ⲧ’ϣ̣ⲟ̣[ⲟ]ⲡ’ ⲟⲛⲧⲱⲥ <text:line-break/><text:span text:style-name="T1"> </text:span><text:span text:style-name="T2">(53/25) </text:span> [ⲁⲩ]ⲱ [ⲁ]ⲉⲓϫⲱⲕⲙ ⲛ ϯⲟⲩ <text:line-break/><text:span text:style-name="T1"> </text:span><text:span text:style-name="T2">(54/1) </text:span> ⲛ ⲥⲟ̣[ⲡ <text:line-break/><text:span text:style-name="T1"> </text:span><text:span text:style-name="T2">(54/2) </text:span> ⲙⲛ ⲓ̣̈[ <text:line-break/><text:span text:style-name="T1"> </text:span><text:span text:style-name="T2">(54/3) </text:span> ⲛⲧⲉ ⲡ̣[ <text:line-break/><text:span text:style-name="T1"> </text:span><text:span text:style-name="T2">(54/4) </text:span> ⲍ̅ⲁ̅ⲣ̅ⲉ̅ⲩ̅[ <text:line-break/><text:span text:style-name="T1"> </text:span><text:span text:style-name="T2">(54/5) </text:span> ⲉⲃⲟⲗ ϩ[ⲛ ⲉ]‐ <text:line-break/><text:span text:style-name="T1"> </text:span><text:span text:style-name="T2">(54/6) </text:span> ⲧⲙⲙⲁⲩ[ <text:line-break/><text:span text:style-name="T1"> </text:span><text:span text:style-name="T2">(54/7) </text:span> ⲛ ⲧⲉⲗⲓⲟⲥ̣ [ <text:line-break/><text:span text:style-name="T1"> </text:span><text:span text:style-name="T2">(54/8) </text:span> ⲙⲛ ϯⲛⲟϭ ⲙ [ <text:line-break/><text:span text:style-name="T1"> </text:span><text:span text:style-name="T2">(54/9) </text:span> [ⲉ]ⲟⲟ̣ⲩ ⲧⲁⲛ[ <text:line-break/><text:span text:style-name="T1"> </text:span><text:span text:style-name="T2">(54/10) </text:span> [...]ⲛⲟⲥ ⲛ [ <text:line-break/><text:span text:style-name="T1"> </text:span><text:span text:style-name="T2">(54/11) </text:span> [ⲛⲟ]ⲩⲧⲉ· ϯ[ <text:line-break/><text:span text:style-name="T1"> </text:span><text:span text:style-name="T2">(54/12) </text:span> ⲟⲩⲱⲛϩ ⲉⲃⲟⲗ ..[ <text:line-break/><text:span text:style-name="T1"> </text:span><text:span text:style-name="T2">(54/13) </text:span> ⲧⲉⲗⲓⲟⲥ ⲉⲧ’ⲕⲏⲃ ⲧⲏ[ⲣ%1 <text:line-break/><text:span text:style-name="T1"> </text:span><text:span text:style-name="T2">(54/14) </text:span> ⲧⲁⲛⲓⲉⲓⲇⲟⲥ ⲧⲏⲣⲟⲩ [ <text:line-break/><text:span text:style-name="T1"> </text:span><text:span text:style-name="T2">(54/15) </text:span> ⲛ ϩⲟⲟⲩⲧ’· ϯⲣⲉϥⲁ[ⲙⲁϩⲧⲉ] <text:line-break/><text:span text:style-name="T1"> </text:span><text:span text:style-name="T2">(54/16) </text:span> ⲙ̣ ⲡⲉⲟⲟⲩ· ⲧⲙⲁⲁⲩ [ <text:line-break/><text:span text:style-name="T1"> </text:span><text:span text:style-name="T2">(54/17) </text:span> [ⲛ]ⲓⲉⲟⲟⲩ ⲓ̈ⲟ̅ⲩ̅ⲏ̅ⲗ̅ ⲙⲛ ⲡ[ⲓϥⲧⲟ]‐ <text:line-break/><text:span text:style-name="T1"> </text:span><text:span text:style-name="T2">(54/18) </text:span> ⲟⲩ ⲙ ⲫⲱⲥⲧⲏⲣ ⲛ ⲧⲉ̣[ⲗⲓⲟⲥ <text:line-break/><text:span text:style-name="T1"> </text:span><text:span text:style-name="T2">(54/19) </text:span> ⲡⲣⲱⲧⲟⲫⲁⲛⲏⲥ ⲛ̣[ⲧⲉ ⲡⲓⲛⲟϭ] <text:line-break/><text:span text:style-name="T1"> </text:span><text:span text:style-name="T2">(54/20) </text:span> ⲛ ⲛⲟⲩⲥ ⲥ̅ⲉ̅ⲗ̅ⲙ̅ⲉ̅ⲛ̅ ⲙ[ⲛ ⲛⲏ ⲉⲧ]‐ <text:line-break/><text:span text:style-name="T1"> </text:span><text:span text:style-name="T2">(54/21) </text:span> ⲕⲏ ⲛⲙⲙⲁϥ ⲛⲓⲣⲉϥ[ⲟⲩⲉⲛϩ] <text:line-break/><text:span text:style-name="T1"> </text:span><text:span text:style-name="T2">(54/22) </text:span> ⲛⲟⲩⲧⲉ ⲉⲃⲟⲗ· ⲍⲁⲭⲑ̣[ⲟⲥ] <text:line-break/><text:span text:style-name="T1"> </text:span><text:span text:style-name="T2">(54/23) </text:span> ⲙⲛ ⲓ̈ⲁ̅ⲭ̅ⲑ̅ⲟ̅ⲥ̅· ⲥ̅ⲏⲑⲉ̅[ⲩⲥ] <text:line-break/><text:span text:style-name="T1"> </text:span><text:span text:style-name="T2">(54/24) </text:span> ⲙⲛ ⲁ̅ⲛ̅ⲧ̅ⲓ̅ⲫ̅ⲁ̅ⲛ̅[̅ⲧ̅ⲏ̅]̅ⲥ̅· [ⲥ̅ⲉⲗ̅]‐ <text:line-break/><text:span text:style-name="T1"> </text:span><text:span text:style-name="T2">(54/25) </text:span> ⲇ̅ⲁ̅ⲱ̅· ⲙⲛ ⲉⲗⲉ[ⲛ]ⲟ̣ⲥ̣ [ <text:line-break/><text:span text:style-name="T1"> </text:span><text:span text:style-name="T2">(55/1) </text:span> [ ].ⲧⲟ <text:line-break/><text:span text:style-name="T1"> </text:span><text:span text:style-name="T2">(55/2) </text:span> [ ]ⲛ ⲉⲓ <text:line-break/><text:span text:style-name="T1"> </text:span><text:span text:style-name="T2">(55/3) </text:span> [ ] ⲉ ⲡⲓⲁ‐ <text:line-break/><text:soft-page-break/><text:span text:style-name="T1"> </text:span><text:span text:style-name="T2">(55/4) </text:span> [ ]ⲱⲛⲉⲩ <text:line-break/><text:span text:style-name="T1"> </text:span><text:span text:style-name="T2">(55/5) </text:span> [ ]ⲉⲓⲛⲉ <text:line-break/><text:span text:style-name="T1"> </text:span><text:span text:style-name="T2">(55/6) </text:span> [ ]ⲟⲟⲡ’ ⲛ <text:line-break/><text:span text:style-name="T1"> </text:span><text:span text:style-name="T2">(55/7) </text:span> [ ]ⲛ̣ⲧⲉ ⲛⲓⲁⲩ‐ <text:line-break/><text:span text:style-name="T1"> </text:span><text:span text:style-name="T2">(55/8) </text:span> [ ]ⲛⲁⲩ ⲅⲁⲣ ⲉ <text:line-break/><text:span text:style-name="T1"> </text:span><text:span text:style-name="T2">(55/9) </text:span> [ ]ⲉ̣ⲱⲛ ⲉⲩⲉⲓ‐ <text:line-break/><text:span text:style-name="T1"> </text:span><text:span text:style-name="T2">(55/10) </text:span> [ ]ϩⲟⲩⲟ <text:line-break/><text:span text:style-name="T1"> </text:span><text:span text:style-name="T2">(55/11) </text:span> [ ⲫ]ⲱⲥⲧⲏ[ⲣ <text:line-break/><text:span text:style-name="T1"> </text:span><text:span text:style-name="T2">(55/12) </text:span> [........]ⲛ ⲛ̣[ⲓ]ⲉⲟⲟⲩ ⲛϩⲟⲩⲟ <text:line-break/><text:span text:style-name="T1"> </text:span><text:span text:style-name="T2">(55/13) </text:span> [.....] ⲛⲁ̣ⲓ̣̈ ⲛⲉ ⲕⲁⲧⲁ ⲡⲟⲩⲁ <text:line-break/><text:span text:style-name="T1"> </text:span><text:span text:style-name="T2">(55/14) </text:span> [ⲡⲟⲩⲁ] ⲛⲧⲉ ⲛⲓⲉⲱⲛ· ⲟⲩ‐ <text:line-break/><text:span text:style-name="T1"> </text:span><text:span text:style-name="T2">(55/15) </text:span> [ⲕⲁϩ ⲉ]ϥⲟⲛϩ ⲙⲛ ⲟⲩⲙⲟⲟⲩ <text:line-break/><text:span text:style-name="T1"> </text:span><text:span text:style-name="T2">(55/16) </text:span> [ⲉϥⲟⲛ]ϩ ⲙⲛ ⲟⲩⲁⲏⲣ ⲉϥⲉ ⲛ <text:line-break/><text:span text:style-name="T1"> </text:span><text:span text:style-name="T2">(55/17) </text:span> [ⲟⲩ]ⲟ̣ⲉⲓⲛ ⲙⲛ ⲟⲩⲕⲱϩⲧ’ <text:line-break/><text:span text:style-name="T1"> </text:span><text:span text:style-name="T2">(55/18) </text:span> [ⲉϥⲡ]ⲣⲣⲓⲱⲟⲩ ⲉⲃⲟⲗ ⲉⲙⲁϥ‐ <text:line-break/><text:span text:style-name="T1"> </text:span><text:span text:style-name="T2">(55/19) </text:span> [ⲣⲱ]ⲕ̣ϩ ⲙⲛ ϩⲉⲛⲍⲱⲟⲛ ⲁⲩⲱ <text:line-break/><text:span text:style-name="T1"> </text:span><text:span text:style-name="T2">(55/20) </text:span> [ϩⲉⲛϣ]ⲏⲛ· ⲁⲩⲱ ϩⲉⲛⲯⲩⲭⲏ <text:line-break/><text:span text:style-name="T1"> </text:span><text:span text:style-name="T2">(55/21) </text:span> [ⲙⲛ ϩ]ⲉⲛⲛⲟⲩⲥ ⲙⲛ ϩⲉⲛⲣⲱⲙⲉ <text:line-break/><text:span text:style-name="T1"> </text:span><text:span text:style-name="T2">(55/22) </text:span> [ⲙⲛ ⲛ]ⲏ ⲧⲏⲣⲟⲩ ⲉⲧ’ϣⲟⲟⲡ’ <text:line-break/><text:span text:style-name="T1"> </text:span><text:span text:style-name="T2">(55/23) </text:span> [ⲛⲙⲙⲁ]ⲩ· ϩⲉⲛⲛⲟⲩⲧⲉ ⲇⲉ <text:line-break/><text:span text:style-name="T1"> </text:span><text:span text:style-name="T2">(55/24) </text:span> [ⲙⲛ] ϩⲉⲛϭⲟ[ⲙ] ⲁⲩⲱ ϩⲉⲛⲁⲅ‐ <text:line-break/><text:span text:style-name="T1"> </text:span><text:span text:style-name="T2">(55/25) </text:span> [ⲅⲉ]ⲗ̣ⲟⲥ ⲁⲛ̣· ⲛⲁⲓ̈ ⲧⲏⲣⲟⲩ ⲅⲁⲣ <text:line-break/><text:span text:style-name="T1"> </text:span><text:span text:style-name="T2">(56/1) </text:span> ⲛⲉϩ[ <text:line-break/><text:span text:style-name="T1"> </text:span><text:span text:style-name="T2">(56/2) </text:span> ⲁⲩⲱ [ <text:line-break/><text:span text:style-name="T1"> </text:span><text:span text:style-name="T2">(56/3) </text:span> ⲁⲩⲱ ⲛ[ <text:line-break/><text:span text:style-name="T1"> </text:span><text:span text:style-name="T2">(56/4) </text:span> ϣⲟⲟⲡ’ [ <text:line-break/><text:span text:style-name="T1"> </text:span><text:span text:style-name="T2">(56/5) </text:span> ⲧⲏⲣⲟⲩ [ <text:line-break/><text:span text:style-name="T1"> </text:span><text:span text:style-name="T2">(56/6) </text:span> ⲧⲏ̣ⲣⲟⲩ ⲉ̣[ <text:line-break/><text:span text:style-name="T1"> </text:span><text:span text:style-name="T2">(56/7) </text:span> [.]ⲩ ⲧⲏⲣⲟⲩ [ <text:line-break/><text:span text:style-name="T1"> </text:span><text:span text:style-name="T2">(56/8) </text:span> ⲛ̣ⲉ· ⲉⲩⲉ ⲛ .[ <text:line-break/><text:span text:style-name="T1"> </text:span><text:span text:style-name="T2">(56/9) </text:span> [ⲁ]ⲩⲱ ⲉⲩⲉ̣[ <text:line-break/><text:span text:style-name="T1"> </text:span><text:span text:style-name="T2">(56/10) </text:span> [..]ⲁ̣ ⲁⲩⲱ [ <text:line-break/><text:span text:style-name="T1"> </text:span><text:span text:style-name="T2">(56/11) </text:span> [ⲁⲩ]ⲱ ⲛⲏ ⲉ̣[.].[ <text:line-break/><text:span text:style-name="T1"> </text:span><text:span text:style-name="T2">(56/12) </text:span> ⲟⲧϥ ⲙ ⲡⲓⲁⲩⲧⲟ̣ⲅ̣ⲉⲛ[ⲏⲥ ⲁⲩⲱ ⲁⲓ̈]‐ <text:line-break/><text:span text:style-name="T1"> </text:span><text:span text:style-name="T2">(56/13) </text:span> ϫⲓ ⲉⲓⲛⲉ ⲉⲃⲟⲗ ϩⲛ ⲛⲁⲓ̈ [ⲧⲏⲣⲟⲩ ⲁⲩ]‐ <text:line-break/><text:span text:style-name="T1"> </text:span><text:span text:style-name="T2">(56/14) </text:span> ⲟⲩⲱⲛ ⲛϭⲓ ⲛⲓⲉⲱⲛ ⲛ̣[ⲧⲉ ⲡⲓ] <text:line-break/><text:span text:style-name="T1"> </text:span><text:span text:style-name="T2">(56/15) </text:span> ⲁ̣ⲩⲧⲟⲅⲉⲛⲏⲥ ⲟⲩⲛⲟ̣[ϭ ⲛ ⲟⲩⲟ]‐ <text:line-break/><text:span text:style-name="T1"> </text:span><text:span text:style-name="T2">(56/16) </text:span> ⲉⲓⲛ ϣⲁϥⲡⲓⲣⲉ ⲉϩⲣⲁⲓ̈ ⲉ̣[ <text:line-break/><text:span text:style-name="T1"> </text:span><text:span text:style-name="T2">(56/17) </text:span> ⲉ̣ⲃⲟⲗ ϩⲛ ⲛⲓⲉⲱⲛ ⲛⲧⲉ ⲡ̣[ⲓϣⲙⲧ’]‐ <text:line-break/><text:span text:style-name="T1"> </text:span><text:span text:style-name="T2">(56/18) </text:span> ϩ̣ⲟⲟⲩⲧ’ ⲁⲩⲱ ⲛⲉⲩϯ [ⲉⲟⲟⲩ] <text:line-break/><text:span text:style-name="T1"> </text:span><text:span text:style-name="T2">(56/19) </text:span> ⲛⲁⲩ· ⲛⲉⲣⲉ ⲡⲓϥⲧⲟ̣[ⲟⲩ] <text:line-break/><text:span text:style-name="T1"> </text:span><text:span text:style-name="T2">(56/20) </text:span> ⲛⲛ ⲉⲱⲛ ⲛⲉⲩⲟⲩⲱϣ[ⲥ ⲉⲃⲟⲗ] <text:line-break/><text:span text:style-name="T1"> </text:span><text:span text:style-name="T2">(56/21) </text:span> ⲛϩⲣⲁⲓ̈ ϩⲛ ⲟⲩⲉⲱⲛ ⲛ ⲟ̣ⲩ̣[ <text:line-break/><text:span text:style-name="T1"> </text:span><text:span text:style-name="T2">(56/22) </text:span> ⲙ ⲡⲥⲙⲟⲧ’ ⲛⲛ ⲟⲩⲉ[ <text:line-break/><text:span text:style-name="T1"> </text:span><text:span text:style-name="T2">(56/23) </text:span> ⲟⲩⲱⲧ’ ⲉϥϣⲟⲟⲡ’ ⲙ.[ <text:line-break/><text:span text:style-name="T1"> </text:span><text:span text:style-name="T2">(56/24) </text:span> ⲁⲩⲱ ⲧⲟⲧⲉ ⲁϥ[..]ⲧ’ ⲛϭⲓ ⲏ̣̅̅[̅ⲫ̅ⲏ̅ⲥ̅ⲏ̅ⲭ̅] <text:line-break/><text:span text:style-name="T1"> </text:span><text:span text:style-name="T2">(56/25) </text:span> ⲡⲁⲗⲟⲩ ⲛⲧⲉ ⲡⲁ[ⲗ]ⲟ̣ⲩ ⲁ[ <text:line-break/><text:soft-page-break/><text:span text:style-name="T1"> </text:span><text:span text:style-name="T2">(57/1) </text:span> [ ].ⲁ <text:line-break/><text:span text:style-name="T1"> </text:span><text:span text:style-name="T2">(57/2) </text:span> [ ]ⲉⲩ <text:line-break/><text:span text:style-name="T1"> </text:span><text:span text:style-name="T2">(57/3) </text:span> [ ]ⲟⲩⲥ <text:line-break/><text:span text:style-name="T1"> </text:span><text:span text:style-name="T2">(57/4) </text:span> [ ]ⲁ̣ⲧⲟⲩ <text:line-break/><text:span text:style-name="T1"> </text:span><text:span text:style-name="T2">(57/5) </text:span> [ ⲓ̈ⲉ̅ⲥ̅ⲥ̅ⲉ̅ⲩ̅ⲥ̅] ⲙⲁ̅ⲍⲁ̅‐ <text:line-break/><text:span text:style-name="T1"> </text:span><text:span text:style-name="T2">(57/6) </text:span> [ⲣ̅ⲉ̅ⲩ̅ⲥ̅ ⲓ̈ⲉ̅ⲥⲥⲉⲇⲉ]ⲕ̣ⲉⲩⲥ̅ [.] . <text:line-break/><text:span text:style-name="T1"> </text:span><text:span text:style-name="T2">(57/7) </text:span> [ ]ⲟⲙ ⲛⲧⲉ̣[ <text:line-break/><text:span text:style-name="T1"> </text:span><text:span text:style-name="T2">(57/8) </text:span> [......ⲥⲫⲣ]ⲁ̣ⲅ̣ⲓⲥ ϩⲱⲱϥ <text:line-break/><text:span text:style-name="T1"> </text:span><text:span text:style-name="T2">(57/9) </text:span> [.......].[...] ⲙ̣ⲛ ⲅⲁⲃ̣ⲣ̣ⲓⲏ[ⲗ] <text:line-break/><text:span text:style-name="T1"> </text:span><text:span text:style-name="T2">(57/10) </text:span> [.......] ⲛ [...] ⲛ ⲟⲩ[. <text:line-break/><text:span text:style-name="T1"> </text:span><text:span text:style-name="T2">(57/11) </text:span> [.......].ⲩ.[.]ⲉⲛⲥⲫⲣⲁⲅⲓ̣[ⲥ] <text:line-break/><text:span text:style-name="T1"> </text:span><text:span text:style-name="T2">(57/12) </text:span> [....]. ⲛ ϥⲧⲟⲟⲩ ⲛ ⲅⲉⲛⲟⲥ <text:line-break/><text:span text:style-name="T1"> </text:span><text:span text:style-name="T2">(57/13) </text:span> [ⲁⲩⲱ] ⲁ̣ⲥⲉⲓ ⲛⲛⲁϩⲣⲁⲓ̈ ⲛϭⲓ ⲧⲁ‐ <text:line-break/><text:span text:style-name="T1"> </text:span><text:span text:style-name="T2">(57/14) </text:span> [ⲛⲓⲉⲟ]ⲟⲩ ⲛ ϩⲟⲟⲩⲧ’ ⲁⲩⲱ ⲙ <text:line-break/><text:span text:style-name="T1"> </text:span><text:span text:style-name="T2">(57/15) </text:span> [ⲡⲁⲣⲑ]ⲉⲛⲓⲕⲟⲛ ⲓ̈ⲱ̅ⲏ̅ⲗ̅· ⲁⲩ[ⲱ] <text:line-break/><text:span text:style-name="T1"> </text:span><text:span text:style-name="T2">(57/16) </text:span> [ⲁⲉⲓ]ϣⲟϫⲛⲉ ⲉⲧⲃⲉ ⲛⲓⲕⲗⲟⲟ̣[ⲙ] <text:line-break/><text:span text:style-name="T1"> </text:span><text:span text:style-name="T2">(57/17) </text:span> [ⲡⲉϫ]ⲁⲥ ⲛⲁⲓ̈ ϫⲉ ⲉⲧⲃⲉ ⲟⲩ <text:line-break/><text:span text:style-name="T1"> </text:span><text:span text:style-name="T2">(57/18) </text:span> [ⲁϥϣ]ⲟϫⲛⲉ ⲛϭⲓ ⲡⲉⲕⲡⲛ̅ⲁ̅ <text:line-break/><text:span text:style-name="T1"> </text:span><text:span text:style-name="T2">(57/19) </text:span> [ⲉⲧⲃ]ⲉ ⲛⲓⲕⲗⲟⲟⲙ ⲙⲛ ⲛⲓ‐ <text:line-break/><text:span text:style-name="T1"> </text:span><text:span text:style-name="T2">(57/20) </text:span> [ⲥⲫⲣ]ⲁⲅⲓⲥ ⲉⲧ’ⲕⲏ ϩⲓⲱⲟⲩ <text:line-break/><text:span text:style-name="T1"> </text:span><text:span text:style-name="T2">(57/21) </text:span> [...] ⲛⲉ ⲛⲓⲕⲗⲟⲟⲙ ⲉⲧ’ϯ ϭⲟⲙ <text:line-break/><text:span text:style-name="T1"> </text:span><text:span text:style-name="T2">(57/22) </text:span> [ⲙ ⲡⲛ̅]ⲁ̅ ⲛⲓⲙ ⲙⲛ ⲯⲩⲭⲏ ⲛⲓⲙ <text:line-break/><text:span text:style-name="T1"> </text:span><text:span text:style-name="T2">(57/23) </text:span> [ⲛⲓⲥ]ⲫⲣⲁⲅⲓⲥ ⲇⲉ ⲉⲧ’ϣⲟⲟⲡ <text:line-break/><text:span text:style-name="T1"> </text:span><text:span text:style-name="T2">(57/24) </text:span> [ϩⲓ̅ ⲱ]ⲟⲩ ⲛⲓⲙⲛⲧ’ⲅⲉⲛⲟⲥ ⲙⲛ <text:line-break/><text:span text:style-name="T1"> </text:span><text:span text:style-name="T2">(57/25) </text:span> [..] ⲡⲓⲁϩⲟⲣⲁⲧⲟⲛ ⲙ ⲡ̅ⲛ̅ⲁ̅ <text:line-break/><text:span text:style-name="T1"> </text:span><text:span text:style-name="T2">(58/1) </text:span> ⲛ̣ⲉ ⲙ[ <text:line-break/><text:span text:style-name="T1"> </text:span><text:span text:style-name="T2">(58/2) </text:span> ⲑⲉⲛ[ⲟⲥ <text:line-break/><text:span text:style-name="T1"> </text:span><text:span text:style-name="T2">(58/3) </text:span> ⲛⲏ [ <text:line-break/><text:span text:style-name="T1"> </text:span><text:span text:style-name="T2">(58/4) </text:span> ⲙⲉⲛ [ <text:line-break/><text:span text:style-name="T1"> </text:span><text:span text:style-name="T2">(58/5) </text:span> ⲇⲉ ⲛ ⲱ̣[ <text:line-break/><text:span text:style-name="T1"> </text:span><text:span text:style-name="T2">(58/6) </text:span> ⲡⲁⲣⲑⲉ[ⲛⲟⲥ <text:line-break/><text:span text:style-name="T1"> </text:span><text:span text:style-name="T2">(58/7) </text:span> ..ⲥ ⲇⲉ ⲛ [ <text:line-break/><text:span text:style-name="T1"> </text:span><text:span text:style-name="T2">(58/8) </text:span> [.]ϣⲣ ⲁⲓⲧⲓ [ <text:line-break/><text:span text:style-name="T1"> </text:span><text:span text:style-name="T2">(58/9) </text:span> .ⲣⲟ ϩⲛ ⲛⲓ̣[ <text:line-break/><text:span text:style-name="T1"> </text:span><text:span text:style-name="T2">(58/10) </text:span> [ϩ]ⲏⲧⲟⲩ ⲛ[ <text:line-break/><text:span text:style-name="T1"> </text:span><text:span text:style-name="T2">(58/11) </text:span> [...]. ⲁⲩⲱ̣ [..]ⲡ̣[ <text:line-break/><text:span text:style-name="T1"> </text:span><text:span text:style-name="T2">(58/12) </text:span> [...]ʹ264 ⲁϥϯ [ϭⲟ]ⲙ ⲛ[ <text:line-break/><text:span text:style-name="T1"> </text:span><text:span text:style-name="T2">(58/13) </text:span> ⲛⲓⲥⲫⲣⲁⲅⲓⲥ̣ ⲇⲉ ⲛ̣ [ <text:line-break/><text:span text:style-name="T1"> </text:span><text:span text:style-name="T2">(58/14) </text:span> ⲅⲉⲛⲟⲥ ⲛⲁⲡⲓⲁⲩⲧⲟ̣[ⲅⲉⲛⲏⲥ] <text:line-break/><text:span text:style-name="T1"> </text:span><text:span text:style-name="T2">(58/15) </text:span> ⲛⲉ ⲙⲛ ⲡⲓⲡⲣⲱⲧⲟⲫⲁ̣[ⲛⲏⲥ] <text:line-break/><text:span text:style-name="T1"> </text:span><text:span text:style-name="T2">(58/16) </text:span> ⲙⲛ ⲡⲓⲕ̅ⲗ̅ⲥ̅· ⲁⲩⲱ ⲡⲓⲁ̣[ϩⲟⲣⲁ]‐ <text:line-break/><text:span text:style-name="T1"> </text:span><text:span text:style-name="T2">(58/17) </text:span> ⲧⲟⲛ ⲙ ⲡ̅ⲛ̅ⲁ̅ ⲟⲩϭⲟⲙ [ⲙ ⲯⲩ̅] <text:line-break/><text:span text:style-name="T1"> </text:span><text:span text:style-name="T2">(58/18) </text:span> ⲭ̣ⲓⲕⲟⲛ ⲁⲩⲱ ⲛ ⲛⲟⲉⲣ[ⲟⲛ ⲡⲉ] <text:line-break/><text:span text:style-name="T1"> </text:span><text:span text:style-name="T2">(58/19) </text:span> ⲟⲩⲣⲉϥⲉⲓⲙⲉ ⲁⲩⲱ ⲛ [ⲣⲉϥ]‐ <text:line-break/><text:span text:style-name="T1"> </text:span><text:span text:style-name="T2">(58/20) </text:span> ⲣ ϣⲟⲣⲡ’ ⲛ ⲉⲓⲙⲉ· ⲁⲩ[ⲱ ⲉ]‐ <text:line-break/><text:span text:style-name="T1"> </text:span><text:span text:style-name="T2">(58/21) </text:span> ⲧⲃⲉ ⲡⲁⲓ̈ ⲉϥⲛⲧⲟⲟⲧ[ϥ ⲛ ⲅⲁ]‐ <text:line-break/><text:span text:style-name="T1"> </text:span><text:span text:style-name="T2">(58/22) </text:span> ⲃⲣⲓⲏⲗ ⲡⲓⲣⲉϥϯ ⲡ̅ⲛ̅ⲁ̅· ϩⲛ̣ [ <text:line-break/><text:soft-page-break/><text:span text:style-name="T1"> </text:span><text:span text:style-name="T2">(58/23) </text:span> ⲉϣⲱⲡⲉ ⲉϥϣⲁⲛϯ ⲛ [ⲟⲩ]‐ <text:line-break/><text:span text:style-name="T1"> </text:span><text:span text:style-name="T2">(58/24) </text:span> ⲡ̅ⲛ̅ⲁ̅ ⲉϥⲟⲩⲁⲁⲃ ⲛϥⲣ ⲥⲫ[ⲣⲁ]‐ <text:line-break/><text:span text:style-name="T1"> </text:span><text:span text:style-name="T2">(58/25) </text:span> ⲅⲓⲍⲉ ⲙⲙⲟϥ ϩⲙ ⲡⲓⲕⲗ[ⲟⲙ] <text:line-break/><text:span text:style-name="T1"> </text:span><text:span text:style-name="T2">(58/26) </text:span> ⲁⲩⲱ ⲛϥϯ ⲕⲗⲟⲙ ⲛⲁϥ ⲉ̣[ⲩ]‐ <text:line-break/><text:span text:style-name="T1"> </text:span><text:span text:style-name="T2">(58/27) </text:span> ⲛⲧⲁϥ ⲛ ϩⲉⲛⲛⲟⲩⲧⲉ [ <text:line-break/><text:span text:style-name="T1"> </text:span><text:span text:style-name="T2">(59/1) </text:span> [ ⲟ]ⲩϭⲟⲙ <text:line-break/><text:span text:style-name="T1"> </text:span><text:span text:style-name="T2">(59/2) </text:span> [ ] ⲡ̣ⲓⲥⲁ <text:line-break/><text:span text:style-name="T1"> </text:span><text:span text:style-name="T2">(59/3) </text:span> [ ]ⲟⲃ <text:line-break/><text:span text:style-name="T1"> </text:span><text:span text:style-name="T2">(59/4) </text:span> [ ]ⲩ. <text:line-break/><text:span text:style-name="T1"> </text:span><text:span text:style-name="T2">(59/5) </text:span> [ ]ⲡⲓ. <text:line-break/><text:span text:style-name="T1"> </text:span><text:span text:style-name="T2">(59/6) </text:span> [ ]ⲧⲏⲣ ⲛⲁ[ <text:line-break/><text:span text:style-name="T1"> </text:span><text:span text:style-name="T2">(59/7) </text:span> [ ]ⲛ ⲉⲩⲱ[ <text:line-break/><text:span text:style-name="T1"> </text:span><text:span text:style-name="T2">(59/8) </text:span> [ ]ⲛⲡ̅ⲛ̅ⲁ̅ . <text:line-break/><text:span text:style-name="T1"> </text:span><text:span text:style-name="T2">(59/9) </text:span> [ ]ⲱ ⲉⲧⲟⲩⲉⲓ <text:line-break/><text:span text:style-name="T1"> </text:span><text:span text:style-name="T2">(59/10) </text:span> [.......] ϩⲓ [...]ⲉⲉⲩ <text:line-break/><text:span text:style-name="T1"> </text:span><text:span text:style-name="T2">(59/11) </text:span> [.......]ⲓ̣ⲟ.[.]ⲉⲩϣⲟ[ⲟⲡ’] <text:line-break/><text:span text:style-name="T1"> </text:span><text:span text:style-name="T2">(59/12) </text:span> [......]ⲁⲩ ⲁⲩⲱ ⲛⲉⲩⲛϩⲣⲁⲓ̈ <text:line-break/><text:span text:style-name="T1"> </text:span><text:span text:style-name="T2">(59/13) </text:span> [ⲛϩⲏⲧ]ⲟ̣ⲩ ⲁⲛ ϩⲓⲛⲁ ϫⲉ ⲉⲩⲉ‐ <text:line-break/><text:span text:style-name="T1"> </text:span><text:span text:style-name="T2">(59/14) </text:span> [ϣⲱ]ⲡⲉ ⲛ ϩⲁⲡⲗⲟⲩⲛ· ⲁⲩⲱ <text:line-break/><text:span text:style-name="T1"> </text:span><text:span text:style-name="T2">(59/15) </text:span> [ⲛⲥⲉ]ϣ̣ⲧⲙϣⲱⲡⲉ ⲉⲩⲕⲏⲃ <text:line-break/><text:span text:style-name="T1"> </text:span><text:span text:style-name="T2">(59/16) </text:span> [ⲕⲁⲧ]ⲁ̣ ⲗⲁⲁⲩ ⲛ ⲥⲙⲟⲧ’· ⲁⲩⲱ̣ <text:line-break/><text:span text:style-name="T1"> </text:span><text:span text:style-name="T2">(59/17) </text:span> [ⲛⲁⲓ̈]ⲙ̣ⲉⲛ ⲛⲉ ⲛⲓⲕⲁⲧⲁ ⲟⲩⲁ ⲛ <text:line-break/><text:span text:style-name="T1"> </text:span><text:span text:style-name="T2">(59/18) </text:span> [ϩⲁⲡ]ⲗⲟⲩⲛ ⲁⲩⲱ ⲛ ⲧⲉⲗⲓⲟⲥ· <text:line-break/><text:span text:style-name="T1"> </text:span><text:span text:style-name="T2">(59/19) </text:span> [....]ⲣϥ ⲁⲩⲱ ⲛⲁⲓ̈ ⲧⲏⲣⲟⲩ <text:line-break/><text:span text:style-name="T1"> </text:span><text:span text:style-name="T2">(59/20) </text:span> [..ⲉ]ⲱⲛ ⲛⲧⲉ ⲛⲓⲉⲱⲛ ⲉⲩ‐ <text:line-break/><text:span text:style-name="T1"> </text:span><text:span text:style-name="T2">(59/21) </text:span> [...]ⲕ ⲙⲙⲟϥ· ⲛⲁⲓ̈ ⲧⲏⲣⲟⲩ <text:line-break/><text:span text:style-name="T1"> </text:span><text:span text:style-name="T2">(59/22) </text:span> [.. ⲉ]ⲧ’ϣⲟⲟⲡ’ ϩⲓ ⲟⲩⲙⲁ <text:line-break/><text:span text:style-name="T1"> </text:span><text:span text:style-name="T2">(59/23) </text:span> [.. ⲡ]ⲁⲛⲧⲉⲗⲓⲟⲛ· ⲡⲁⲟⲩⲛⲟϭ <text:line-break/><text:span text:style-name="T1"> </text:span><text:span text:style-name="T2">(59/24) </text:span> [...]ⲙ ⲡⲉ ⲉ ⲛⲁⲩ ⲉⲣⲟⲟⲩ <text:line-break/><text:span text:style-name="T1"> </text:span><text:span text:style-name="T2">(59/25) </text:span> [...]ⲧⲛⲁⲩ ⲅⲁⲣ ⲉⲣⲟϥ ⲙ <text:line-break/><text:span text:style-name="T1"> </text:span><text:span text:style-name="T2">(60/1) </text:span> ⲡⲣ[ <text:line-break/><text:span text:style-name="T1"> </text:span><text:span text:style-name="T2">(60/2) </text:span> ⲟⲩ[ <text:line-break/><text:span text:style-name="T1"> </text:span><text:span text:style-name="T2">(60/3) </text:span> ⲙⲟ[ <text:line-break/><text:span text:style-name="T1"> </text:span><text:span text:style-name="T2">(60/4) </text:span> ⲧⲉ̣ⲗ̣ⲓⲟ̣[ⲥ <text:line-break/><text:span text:style-name="T1"> </text:span><text:span text:style-name="T2">(60/5) </text:span> [..]ϯϩ[ <text:line-break/><text:span text:style-name="T1"> </text:span><text:span text:style-name="T2">(60/6) </text:span> [.].ⲟⲩⲱ[ <text:line-break/><text:span text:style-name="T1"> </text:span><text:span text:style-name="T2">(60/7) </text:span> [..]ⲙ ⲛⲓⲙ [ <text:line-break/><text:span text:style-name="T1"> </text:span><text:span text:style-name="T2">(60/8) </text:span> ϣⲟⲟⲡ’ ⲟ[ <text:line-break/><text:span text:style-name="T1"> </text:span><text:span text:style-name="T2">(60/9) </text:span> ⲁⲣ ⲡⲉ ⲉⲛⲉ̣[ <text:line-break/><text:span text:style-name="T1"> </text:span><text:span text:style-name="T2">(60/10) </text:span> [..ⲥ]ⲱⲧⲛ [ⲉⲣ]ⲟϥ ϩ̣[ <text:line-break/><text:span text:style-name="T1"> </text:span><text:span text:style-name="T2">(60/11) </text:span> [...]ⲗ ⲁⲩⲱ [.].ⲩ[ <text:line-break/><text:span text:style-name="T1"> </text:span><text:span text:style-name="T2">(60/12) </text:span> ⲛϩⲣⲁⲓ̈ ϩⲛ ⲟⲩⲉⲛⲛⲟ̣[ⲓⲁ <text:line-break/><text:span text:style-name="T1"> </text:span><text:span text:style-name="T2">(60/13) </text:span> ⲟⲩϣⲟⲣⲡ’ ⲛ ⲉⲛⲛⲟⲓ̣[ⲁ <text:line-break/><text:span text:style-name="T1"> </text:span><text:span text:style-name="T2">(60/14) </text:span> ⲉⲡⲓⲇⲏ ϩⲛ ⲟⲩϭⲟⲙ ⲁⲩ[ <text:line-break/><text:span text:style-name="T1"> </text:span><text:span text:style-name="T2">(60/15) </text:span> ⲛⲩⲧⲉⲗⲓⲟⲥ ⲧⲉ· ⲁ[ <text:line-break/><text:span text:style-name="T1"> </text:span><text:span text:style-name="T2">(60/16) </text:span> ϣϣⲉ ⲉⲣⲟⲕ ⲉ ⲧⲁϣ[ <text:line-break/><text:span text:style-name="T1"> </text:span><text:span text:style-name="T2">(60/17) </text:span> ⲉⲧⲃⲉ ϩⲱⲃ ⲛⲓⲙ· ⲁⲩⲱ̣[ <text:line-break/><text:soft-page-break/><text:span text:style-name="T1"> </text:span><text:span text:style-name="T2">(60/18) </text:span> ⲛⲏ ⲉⲧⲕⲛⲁⲥⲱⲧⲙ ⲉ̣[ⲣⲟⲟⲩ] <text:line-break/><text:span text:style-name="T1"> </text:span><text:span text:style-name="T2">(60/19) </text:span> ⲉⲃⲟⲗ ϩⲓⲧⲛ ⲟⲩⲉⲛⲛ̣[ⲟⲓⲁ] <text:line-break/><text:span text:style-name="T1"> </text:span><text:span text:style-name="T2">(60/20) </text:span> ⲛⲧⲉ ⲛⲏ ⲉⲧ’ϫⲟⲥⲉ ⲉ ⲧ̣[ⲉⲗⲓ]‐ <text:line-break/><text:span text:style-name="T1"> </text:span><text:span text:style-name="T2">(60/21) </text:span> ⲟⲥ ⲁⲩⲱ ⲙⲛ ⲛⲉⲧⲕⲛ̣[ⲁⲥⲟⲩ]‐ <text:line-break/><text:span text:style-name="T1"> </text:span><text:span text:style-name="T2">(60/22) </text:span> ⲱⲛⲟⲩ ϩⲛ ⲟⲩⲯⲩⲭⲏ̣ [ⲛⲧⲉ] <text:line-break/><text:span text:style-name="T1"> </text:span><text:span text:style-name="T2">(60/23) </text:span> ⲛⲓⲧⲉⲗⲓⲟⲥ· ʹ264ʹ264 ⲁⲩⲱ̣ [ⲉ] <text:line-break/><text:span text:style-name="T1"> </text:span><text:span text:style-name="T2">(60/24) </text:span> ⲧⲁⲥ ϫⲉ ⲛⲁⲓ̈ ⲁⲥϯ ⲱⲙ[ⲥ <text:line-break/><text:span text:style-name="T1"> </text:span><text:span text:style-name="T2">(61/1) </text:span> [ ]ⲛ̣ϩ <text:line-break/><text:span text:style-name="T1"> </text:span><text:span text:style-name="T2">(61/2) </text:span> [ ] ⲛ <text:line-break/><text:span text:style-name="T1"> </text:span><text:span text:style-name="T2">(61/3) </text:span> [ ].ⲧⲉ <text:line-break/><text:span text:style-name="T1"> </text:span><text:span text:style-name="T2">(61/4) </text:span> [ ] ⲛ ⲛ[ <text:line-break/><text:span text:style-name="T1"> </text:span><text:span text:style-name="T2">(61/5) </text:span> [ ]ⲱ ⲛ ⲛ [ <text:line-break/><text:span text:style-name="T1"> </text:span><text:span text:style-name="T2">(61/6) </text:span> [ ]ⲟⲥ ⲛ ⲛ̣[ <text:line-break/><text:span text:style-name="T1"> </text:span><text:span text:style-name="T2">(61/7) </text:span> [........].[..] ⲡⲓϣⲟⲣⲡ’̣ <text:line-break/><text:span text:style-name="T1"> </text:span><text:span text:style-name="T2">(61/8) </text:span> [.........]ⲩ̣ⲱ ⲁⲉⲓϫⲓ ϭⲟⲙ <text:line-break/><text:span text:style-name="T1"> </text:span><text:span text:style-name="T2">(61/9) </text:span> [......]ⲩ̣ⲱ ⲁ̣[.]ⲟⲩⲱ̣[..] <text:line-break/><text:span text:style-name="T1"> </text:span><text:span text:style-name="T2">(61/10) </text:span> [........]ⲱ ⲁ[ⲉⲓ]ϫⲓ ⲙⲟⲣⲫⲏ̣ <text:line-break/><text:span text:style-name="T1"> </text:span><text:span text:style-name="T2">(61/11) </text:span> [.....].ⲉ· ⲁⲩⲱ ⲁⲉⲓϫⲓ ⲟⲩⲟ‐ <text:line-break/><text:span text:style-name="T1"> </text:span><text:span text:style-name="T2">(61/12) </text:span> [....]ϥ̣ϣⲟⲟⲡ’ ϩⲓϫⲙ ⲡⲁϣⲁ‐ <text:line-break/><text:span text:style-name="T1"> </text:span><text:span text:style-name="T2">(61/13) </text:span> [....]ϫ̣ⲓ ⲟⲩⲡ̅ⲛ̅ⲁ̅ ⲉϥⲧⲟⲩⲃⲏ[ⲩ] <text:line-break/><text:span text:style-name="T1"> </text:span><text:span text:style-name="T2">(61/14) </text:span> [ⲁⲉⲓ]ϣ̣ⲱⲡⲉ ⲉⲓ̈ϣⲟⲟⲡ’ ⲟⲛ‐ <text:line-break/><text:span text:style-name="T1"> </text:span><text:span text:style-name="T2">(61/15) </text:span> [ⲧⲱⲥ] ⲁⲩⲱ ⲧⲟⲧⲉ ⲁⲥⲛⲧ’ <text:line-break/><text:span text:style-name="T1"> </text:span><text:span text:style-name="T2">(61/16) </text:span> [ⲉϩ]ⲟ̣ⲩⲛ ⲉ ⲡⲓⲛⲟϭ ⲛⲛ ⲉ‐ <text:line-break/><text:span text:style-name="T1"> </text:span><text:span text:style-name="T2">(61/17) </text:span> [ⲱⲛ] ⲡⲓⲙⲁ ⲉⲧⲉ ⲡⲓϣⲙⲧ’‐ <text:line-break/><text:span text:style-name="T1"> </text:span><text:span text:style-name="T2">(61/18) </text:span> [ϩⲟⲟ]ⲩⲧ’ ⲛ ⲧⲉⲗⲓⲟⲥ ⲙ‐ <text:line-break/><text:span text:style-name="T1"> </text:span><text:span text:style-name="T2">(61/19) </text:span> [ⲙⲁⲩ]· ⲁⲩⲱ ⲁⲉⲓⲛⲁⲩ ⲉ <text:line-break/><text:span text:style-name="T1"> </text:span><text:span text:style-name="T2">(61/20) </text:span> [ⲡⲁ]ⲗⲟⲩ ⲛⲛ ⲁⲧⲛⲁⲩ ⲉⲣⲟϥ <text:line-break/><text:span text:style-name="T1"> </text:span><text:span text:style-name="T2">(61/21) </text:span> [ϩⲣⲁ]ⲓ̣̈ ϩⲛ ⲟⲩ〈ⲟⲩ〉ⲟⲉⲓⲛ ⲛⲛ ⲁⲧ‐ <text:line-break/><text:span text:style-name="T1"> </text:span><text:span text:style-name="T2">(61/22) </text:span> [ⲛⲁ]ⲩ̣ ⲉⲣⲟϥ· ⲧⲟⲧⲉ ⲟⲛ <text:line-break/><text:span text:style-name="T1"> </text:span><text:span text:style-name="T2">(61/23) </text:span> [ⲁⲥ]ϯ ⲱⲙⲥ ⲛⲁⲓ̈ ⲛϩⲣⲁⲓ̈ ϩⲛ <text:line-break/><text:span text:style-name="T1"> </text:span><text:span text:style-name="T2">(62/1) </text:span> ⲉ̣ⲩ[ <text:line-break/><text:span text:style-name="T1"> </text:span><text:span text:style-name="T2">(62/2) </text:span> ⲉⲧ̣[ <text:line-break/><text:span text:style-name="T1"> </text:span><text:span text:style-name="T2">(62/3) </text:span> ϫⲟⲟ[ <text:line-break/><text:span text:style-name="T1"> </text:span><text:span text:style-name="T2">(62/4) </text:span> [..]ϭⲟ̣[ <text:line-break/><text:span text:style-name="T1"> </text:span><text:span text:style-name="T2">(62/5) </text:span> [..] ⲡⲉⲥⲥ.[........ <text:line-break/><text:span text:style-name="T1"> </text:span><text:span text:style-name="T2">(62/6) </text:span> [ⲙ]ⲙ̣ⲟϥ ⲡⲉ̣[........ <text:line-break/><text:span text:style-name="T1"> </text:span><text:span text:style-name="T2">(62/7) </text:span> [ⲁⲩ]ⲱ ⲁⲉⲓ.[ <text:line-break/><text:span text:style-name="T1"> </text:span><text:span text:style-name="T2">(62/8) </text:span> [ⲁ]ⲉⲓϭⲙ ϭⲟⲙ ⲉ ⲛ[...... <text:line-break/><text:span text:style-name="T1"> </text:span><text:span text:style-name="T2">(62/9) </text:span> [..]. ⲛⲓⲛⲟϭ ⲛⲛ ⲁ.[.... <text:line-break/><text:span text:style-name="T1"> </text:span><text:span text:style-name="T2">(62/10) </text:span> [.. ⲁ]ⲩⲱ ⲛ [ⲧ]ⲉⲗⲓⲟ̣[ⲥ.... <text:line-break/><text:span text:style-name="T1"> </text:span><text:span text:style-name="T2">(62/11) </text:span> ⲡ̣ⲉϫⲁⲥ ⲛⲁⲓ̈ ⲛϭⲓ ⲧⲁⲛ[ⲓⲉⲟⲟⲩ] <text:line-break/><text:span text:style-name="T1"> </text:span><text:span text:style-name="T2">(62/12) </text:span> ⲧⲏⲣⲟⲩ ⲓ̈ⲱ̅ⲏ̅ⲗ̅ ϫⲉ ⲛⲓϫ[ⲱⲕⲙ] <text:line-break/><text:span text:style-name="T1"> </text:span><text:span text:style-name="T2">(62/13) </text:span> ⲧⲏⲣⲟⲩ ⲉⲧⲥⲙⲡϣⲁ ⲛ̣ [ϫⲓ] <text:line-break/><text:span text:style-name="T1"> </text:span><text:span text:style-name="T2">(62/14) </text:span> ⲱⲙⲥ ⲛϩⲏⲧⲟⲩ ⲁⲕϫ[ⲓⲧⲟⲩ] <text:line-break/><text:span text:style-name="T1"> </text:span><text:span text:style-name="T2">(62/15) </text:span> [ⲁ]ⲩⲱ ⲁⲕϣⲱⲡⲉ ⲛ ⲧⲉ[ⲗⲓⲟⲥ <text:line-break/><text:span text:style-name="T1"> </text:span><text:span text:style-name="T2">(62/16) </text:span> [.].ⲟⲥ ⲡⲓⲥⲱⲧⲙ ⲛⲧⲉ̣[.... <text:line-break/><text:span text:style-name="T1"> </text:span><text:span text:style-name="T2">(62/17) </text:span> ⲧ̣ⲏⲣⲟⲩ· ϯⲛⲟⲩ ϭⲉ ⲙⲟ[ⲩⲧⲉ] <text:line-break/><text:soft-page-break/><text:span text:style-name="T1"> </text:span><text:span text:style-name="T2">(62/18) </text:span> ⲟⲩⲉ ⲥ̅ⲁ̅ⲗ̅ⲁ̅ⲙ̅ⲉ̅ⲝ̅ ⲙⲛ .[ <text:line-break/><text:span text:style-name="T1"> </text:span><text:span text:style-name="T2">(62/19) </text:span> ⲙⲛ ϯⲡⲁⲛⲧⲉⲗⲓⲟⲥ ⲁⲣ̅.[ <text:line-break/><text:span text:style-name="T1"> </text:span><text:span text:style-name="T2">(62/20) </text:span> ⲛⲓⲫⲱⲥⲧⲏⲣ ⲛⲧⲉ ⲡⲓⲁⲓ[ⲱⲛ] <text:line-break/><text:span text:style-name="T1"> </text:span><text:span text:style-name="T2">(62/21) </text:span> ⲛ ⲃ̅ⲁ̅ⲣ̅ⲃ̅ⲏ̅ⲗ̅ⲱ̅ ⲙⲛ ϯⲅⲛⲱ̣[ⲥⲓⲥ] <text:line-break/><text:span text:style-name="T1"> </text:span><text:span text:style-name="T2">(62/22) </text:span> ⲛ ⲁⲧ’ϯ ϣⲓ ⲉⲣⲟⲥ· ⲁⲩⲱ̣ [ⲛⲏ] <text:line-break/><text:span text:style-name="T1"> </text:span><text:span text:style-name="T2">(62/23) </text:span> ⲉⲧⲙⲙⲁⲩ ⲥⲉⲛⲁϭⲱⲗⲡ [ⲉⲃⲟⲗ] <text:line-break/><text:span text:style-name="T1"> </text:span><text:span text:style-name="T2">(63/1) </text:span> [ ]ⲁ̣ⲧⲛⲁⲩ <text:line-break/><text:span text:style-name="T1"> </text:span><text:span text:style-name="T2">(63/2) </text:span> [ ].ⲏⲥⲡ[ <text:line-break/><text:span text:style-name="T1"> </text:span><text:span text:style-name="T2">(63/3) </text:span> [ ]ⲟⲩ[ <text:line-break/><text:span text:style-name="T1"> </text:span><text:span text:style-name="T2">(63/4) </text:span> [ ]ⲉⲁⲩ[ <text:line-break/><text:span text:style-name="T1"> </text:span><text:span text:style-name="T2">(63/5) </text:span> [ ].ⲉⲧ.[ <text:line-break/><text:span text:style-name="T1"> </text:span><text:span text:style-name="T2">(63/6) </text:span> [.......ⲃ]ⲁ̅ⲣ̅ⲃ̅ⲏ̅ⲗ̅ⲱ̅ ⲙ ⲡⲁⲣ̣[ⲑⲉ]‐ <text:line-break/><text:span text:style-name="T1"> </text:span><text:span text:style-name="T2">(63/7) </text:span> [ⲛⲟⲥ ⲁⲩⲱ] ⲡⲓⲁⲧⲛⲁⲩ ⲉⲣⲟϥ <text:line-break/><text:span text:style-name="T1"> </text:span><text:span text:style-name="T2">(63/8) </text:span> [ⲛ ϣⲙⲧ’ϭ]ⲟ̣ⲙ ⲙ ⲡ̅ⲛ̅ⲁ̅· ⲛ̣[ⲁⲓ̈] <text:line-break/><text:span text:style-name="T1"> </text:span><text:span text:style-name="T2">(63/9) </text:span> [ⲉⲧⲧⲁⲥϫⲟ]ⲟⲩ ⲛⲁⲓ̈ ⲛϭⲓ ⲧⲁ[ⲛⲓⲉ]‐ <text:line-break/><text:span text:style-name="T1"> </text:span><text:span text:style-name="T2">(63/10) </text:span> [ⲟⲟⲩ] ⲧ̣ⲏⲣⲟⲩ ⲓ̈ⲟ̅ⲩ̅ⲏ̅ⲗ̅ ⲁⲥⲕⲁ‐ <text:line-break/><text:span text:style-name="T1"> </text:span><text:span text:style-name="T2">(63/11) </text:span> [ⲁⲧ’ ⲁ]ⲩⲱ ⲁⲥⲃⲱⲕ ⲁⲥⲁϩⲉⲣⲁ‐ <text:line-break/><text:span text:style-name="T1"> </text:span><text:span text:style-name="T2">(63/12) </text:span> [ⲧⲥ ⲛ]ⲛⲁϩⲣⲁϥ ⲙ ⲡⲓⲡⲣⲱⲧⲟ‐ <text:line-break/><text:span text:style-name="T1"> </text:span><text:span text:style-name="T2">(63/13) </text:span> [ⲫⲁⲛ]ⲏ̣ⲥ· ⲧⲟⲧⲉ ⲁⲛⲟⲕ ⲛⲉⲓ̈‐ <text:line-break/><text:span text:style-name="T1"> </text:span><text:span text:style-name="T2">(63/14) </text:span> [ⲁϩⲉⲣ]ⲁ̣ⲧ’ ⲛϩⲣⲁⲓ̈ ϩⲓϫⲙ ⲡⲁⲡ̅ⲛ̅[̅ⲁ̅] <text:line-break/><text:span text:style-name="T1"> </text:span><text:span text:style-name="T2">(63/15) </text:span> [ⲉⲉⲓ]ⲧⲱⲃϩ ⲉⲙⲁⲧⲉ ⲛ ⲛⲓⲛⲟϭ <text:line-break/><text:span text:style-name="T1"> </text:span><text:span text:style-name="T2">(63/16) </text:span> [ⲙ ⲫ]ⲱⲥⲧⲏⲣ ⲛϩⲣⲁⲓ̈ ϩⲛ ⲟⲩ‐ <text:line-break/><text:span text:style-name="T1"> </text:span><text:span text:style-name="T2">(63/17) </text:span> [ⲉⲛⲛ]ⲟ̣ⲓⲁ· ⲛⲉⲓⲙⲟⲩⲧⲉ <text:line-break/><text:span text:style-name="T1"> </text:span><text:span text:style-name="T2">(63/18) </text:span> [ⲟⲩ]ⲃ̣ⲉ ⲥ̅ⲁ̅ⲗ̅ⲁ̅ⲙ̅ⲉ̅ⲝ̅ ⲙⲛ ⲥⲉ‐ <text:line-break/><text:span text:style-name="T1"> </text:span><text:span text:style-name="T2">(63/19) </text:span> [..]ⲉⲛ ⲙⲛ ϯⲡⲁⲛⲧⲉⲗⲓⲟⲥ <text:line-break/><text:span text:style-name="T1"> </text:span><text:span text:style-name="T2">(63/20) </text:span> [..].̅ⲏ̅· ⲁⲩⲱ ⲁⲓ̈ⲛⲁⲩ ⲉ ϩⲉⲛ‐ <text:line-break/><text:span text:style-name="T1"> </text:span><text:span text:style-name="T2">(63/21) </text:span> [ⲉⲟ]ⲟⲩ ⲉⲛⲉⲁⲩ ⲉ ϩⲉⲛϭⲟⲙ <text:line-break/><text:span text:style-name="T1"> </text:span><text:span text:style-name="T2">(63/22) </text:span> [ⲁⲩ]ⲱ ⲁⲩϫⲱϩ ⲉⲣⲟⲉⲓ· ⲁⲓ̈ϭⲙ ϭⲟⲙ <text:line-break/><text:span text:style-name="T1"> </text:span><text:span text:style-name="T2">(64/1) </text:span> ⲁ.[ <text:line-break/><text:span text:style-name="T1"> </text:span><text:span text:style-name="T2">(64/2) </text:span> ϩⲙ ⲡⲁ[ <text:line-break/><text:span text:style-name="T1"> </text:span><text:span text:style-name="T2">(64/3) </text:span> [ⲁ]ⲩⲱ .[ <text:line-break/><text:span text:style-name="T1"> </text:span><text:span text:style-name="T2">(64/4) </text:span> [.]ϯⲡⲁ.[ <text:line-break/><text:span text:style-name="T1"> </text:span><text:span text:style-name="T2">(64/5) </text:span> [.]ⲟ̣ⲟⲩⲧ[...].[ <text:line-break/><text:span text:style-name="T1"> </text:span><text:span text:style-name="T2">(64/6) </text:span> [ⲁ]ⲥϩⲱⲃⲥ ⲉⲃⲟⲗ̣ [ <text:line-break/><text:span text:style-name="T1"> </text:span><text:span text:style-name="T2">(64/7) </text:span> {ⲟⲩ} ⲧⲏⲣⲟⲩ· [ <text:line-break/><text:span text:style-name="T1"> </text:span><text:span text:style-name="T2">(64/8) </text:span> [.]ⲥ̣̅̅ⲁ̅ⲗ̅ⲁ̅ⲙ̅ⲉ̅ⲝ̅ ⲙ[ⲛ ⲥ̅ⲉⲗ̅ <text:line-break/><text:span text:style-name="T1"> </text:span><text:span text:style-name="T2">(64/9) </text:span> [ⲛ]ⲏ̣ ⲉⲧⲁⲩϭⲱⲗⲡ̣ [ⲛⲁⲓ̈ ⲉⲃⲟⲗ] <text:line-break/><text:span text:style-name="T1"> </text:span><text:span text:style-name="T2">(64/10) </text:span> ⲛ ϩⲱⲃ ⲛⲓⲙ ⲉⲩϫⲱ ⲙ̣[ⲙⲟⲥ] <text:line-break/><text:span text:style-name="T1"> </text:span><text:span text:style-name="T2">(64/11) </text:span> ϫⲉ ⲍ̅ⲱ̅ⲥ̅ⲧ̅ⲣ̅ⲓ̅ⲁ̅ⲛ̅ⲉ̅ ⲥ̣[ⲱⲧⲙ] <text:line-break/><text:span text:style-name="T1"> </text:span><text:span text:style-name="T2">(64/12) </text:span> ⲉⲧⲃⲉ ⲛⲏ ⲉⲧⲕⲱⲧ̣[ⲉ ⲛ]‐ <text:line-break/><text:span text:style-name="T1"> </text:span><text:span text:style-name="T2">(64/13) </text:span> §ⲥⲱⲟⲩ·ʹ264ʹ264ʹ264 ⲛⲉⲟⲩ[ <text:line-break/><text:span text:style-name="T1"> </text:span><text:span text:style-name="T2">(64/14) </text:span> ⲁⲩⲱ ⲟⲩⲁ ⲟⲩⲱⲧ’ ⲡ[ <text:line-break/><text:span text:style-name="T1"> </text:span><text:span text:style-name="T2">(64/15) </text:span> ϣⲟⲟⲡ’ ϩⲁⲑⲏ ⲛ ⲛⲁⲓ̈ ⲧ[ⲏⲣⲟⲩ] <text:line-break/><text:span text:style-name="T1"> </text:span><text:span text:style-name="T2">(64/16) </text:span> ⲉⲧ’ϣⲟⲟⲡ’ ⲟⲛⲧⲱⲥ̣ [ϩⲙ ⲡⲓ]‐ <text:line-break/><text:span text:style-name="T1"> </text:span><text:span text:style-name="T2">(64/17) </text:span> ⲡⲛ̅ⲁ̅ ⲛ ⲁⲧ’ϣⲓ ⲉⲣ[ⲟϥ] <text:line-break/><text:span text:style-name="T1"> </text:span><text:span text:style-name="T2">(64/18) </text:span> ⲁⲩⲱ ⲛ ⲁⲧ’ⲡⲱⲣϫ ⲛ [. <text:line-break/><text:span text:style-name="T1"> </text:span><text:span text:style-name="T2">(64/19) </text:span> ⲟⲩⲁ ⲙ ⲡⲧⲏⲣϥ ⲉⲧ’[ϣⲟ]‐ <text:line-break/><text:soft-page-break/><text:span text:style-name="T1"> </text:span><text:span text:style-name="T2">(64/20) </text:span> ⲟⲡ’ ⲛϩⲏⲧϥ ⲙⲛ ⲡⲓ.[ <text:line-break/><text:span text:style-name="T1"> </text:span><text:span text:style-name="T2">(64/21) </text:span> ⲙⲙⲟϥ ⲙⲛ ⲡⲏ ⲉⲧ’ⲙ[ <text:line-break/><text:span text:style-name="T1"> </text:span><text:span text:style-name="T2">(64/22) </text:span> ⲛⲥⲱϥ· ⲉⲛⲧⲟϥ ⲙⲁⲩ̣[ⲁⲁϥ <text:line-break/><text:span text:style-name="T1"> </text:span><text:span text:style-name="T2">(64/23) </text:span> ⲉⲧ’ϫⲓⲟⲟⲣ ⲙⲙⲟϥ ⲛ [ <text:line-break/><text:span text:style-name="T1"> </text:span><text:span text:style-name="T2">(65/1) </text:span> [..]ⲧ̣ϥ [..]ⲁⲧ[....... <text:line-break/><text:span text:style-name="T1"> </text:span><text:span text:style-name="T2">(65/2) </text:span> [..]ⲛ̣[.]ⲁ ⲛ ⲁⲧ’[......]ⲁⲧ‐ <text:line-break/><text:span text:style-name="T1"> </text:span><text:span text:style-name="T2">(65/3) </text:span> [....].ⲁ̣ⲧ’ⲟ̣[....] ⲛ ⲁⲧ’‐ <text:line-break/><text:span text:style-name="T1"> </text:span><text:span text:style-name="T2">(65/4) </text:span> [....]ⲏ̣ⲛⲁⲩ̣[...]ⲟ̣ⲩ· . <text:line-break/><text:span text:style-name="T1"> </text:span><text:span text:style-name="T2">(65/5) </text:span> [......].[.. ⲛ]ⲁ̣ⲓ̈ ⲧⲏⲣ[ⲟⲩ] <text:line-break/><text:span text:style-name="T1"> </text:span><text:span text:style-name="T2">(65/6) </text:span> [.........]ⲁⲣ[.]ⲏ ⲡⲉ ⲛ̣ [. <text:line-break/><text:span text:style-name="T1"> </text:span><text:span text:style-name="T2">(65/7) </text:span> [....... ⲟ]ⲩϣⲟⲣⲡ’ ⲛ.[ <text:line-break/><text:span text:style-name="T1"> </text:span><text:span text:style-name="T2">(65/8) </text:span> [...... ⲛ]ⲧ̣ⲉ ⲉⲛⲛⲟⲓⲁ ⲛⲓ[ⲙ] <text:line-break/><text:span text:style-name="T1"> </text:span><text:span text:style-name="T2">(65/9) </text:span> [......]ⲉ ⲛⲧⲉ ϭⲟⲙ ⲛⲓ̣[ⲙ] <text:line-break/><text:span text:style-name="T1"> </text:span><text:span text:style-name="T2">(65/10) </text:span> [......] ⲉϩⲟⲩⲛ ⲉ ⲡⲉ[ⲥⲏⲧ] <text:line-break/><text:span text:style-name="T1"> </text:span><text:span text:style-name="T2">(65/11) </text:span> [...] ⲉϥⲥⲉⲙⲛⲏⲩ ⲉϩⲟⲩⲛ <text:line-break/><text:span text:style-name="T1"> </text:span><text:span text:style-name="T2">(65/12) </text:span> [...]ⲥ̣ⲁ̣ϩⲉⲣⲁⲧϥ· ⲉϥⲟⲩⲟ‐ <text:line-break/><text:span text:style-name="T1"> </text:span><text:span text:style-name="T2">(65/13) </text:span> [ⲧⲃ ⲉ]ϩⲟⲩⲛ ⲉ ⲡⲓⲉⲓ ⲉⲩⲙⲁ <text:line-break/><text:span text:style-name="T1"> </text:span><text:span text:style-name="T2">(65/14) </text:span> [...] ⲙⲛ ⲟⲩⲁⲧⲛ ⲁⲣⲏϫϥ <text:line-break/><text:span text:style-name="T1"> </text:span><text:span text:style-name="T2">(65/15) </text:span> [ⲁⲩ]ⲱ̣ ⲉϥϫⲟⲥⲉ ⲉϩⲟⲩⲉ ⲁ‐ <text:line-break/><text:span text:style-name="T1"> </text:span><text:span text:style-name="T2">(65/16) </text:span> [ⲧⲛ] ⲣⲁⲧϥ ⲛⲓⲙ· ⲁⲩⲱ ⲉϥϯ <text:line-break/><text:span text:style-name="T1"> </text:span><text:span text:style-name="T2">(65/17) </text:span> [...] ⲉⲛⲉⲁϥ ⲉ ⲥⲱⲙⲁ ⲛⲓⲙ <text:line-break/><text:span text:style-name="T1"> </text:span><text:span text:style-name="T2">(65/18) </text:span> [ⲉ]ϥⲧⲟⲩⲃⲏⲩ ⲉ ⲁⲧⲥⲱⲙⲁ <text:line-break/><text:span text:style-name="T1"> </text:span><text:span text:style-name="T2">(65/19) </text:span> [ⲛⲓ]ⲙ· ⲉϥⲛⲁ ⲉϩⲟⲩⲛ ⲉ ⲉⲛ‐ <text:line-break/><text:span text:style-name="T1"> </text:span><text:span text:style-name="T2">(65/20) </text:span> [ⲛⲟⲓ]ⲁ ⲛⲓⲙ ⲙⲛ ⲥⲱⲙⲁ ⲛⲓⲙ <text:line-break/><text:span text:style-name="T1"> </text:span><text:span text:style-name="T2">(65/21) </text:span> [ⲉϥ]ⲉ ⲛ ϭⲟⲙ ⲉ ⲛⲁⲓ̈ ⲧⲏⲣⲟⲩ <text:line-break/><text:span text:style-name="T1"> </text:span><text:span text:style-name="T2">(65/22) </text:span> [ⲅⲉⲛ]ⲟⲥ ⲛⲓⲙ ⲙⲛ ⲉⲓⲇⲟⲥ <text:line-break/><text:span text:style-name="T1"> </text:span><text:span text:style-name="T2">(65/23) </text:span> [ⲛⲓⲙ] ⲉⲩⲡⲧⲏⲣϥ ⲛⲧⲁⲩ ⲡⲉ <text:line-break/><text:span text:style-name="T1"> </text:span><text:span text:style-name="T2">(66/1) </text:span> [.........]ϣⲟ̣ⲟⲡ’ <text:line-break/><text:span text:style-name="T1"> </text:span><text:span text:style-name="T2">(66/2) </text:span> ⲁ̣ⲩ[......]ⲟ̣ⲟⲡ’ ⲟⲛ̣[.. <text:line-break/><text:span text:style-name="T1"> </text:span><text:span text:style-name="T2">(66/3) </text:span> ⲛ ⲧ[......].ⲧⲏⲣ[.... <text:line-break/><text:span text:style-name="T1"> </text:span><text:span text:style-name="T2">(66/4) </text:span> [.]ⲩ̣ⲁⲣⲉ[....]ⲣϥ· ⲡⲓ̣[... <text:line-break/><text:span text:style-name="T1"> </text:span><text:span text:style-name="T2">(66/5) </text:span> [..]ⲕⲟⲛ .[...]ⲩⲱ̣ ⲛ ⲛ[... <text:line-break/><text:span text:style-name="T1"> </text:span><text:span text:style-name="T2">(66/6) </text:span> ⲁ̣· ⲉⲩⲙⲉⲣⲓⲕ[ⲟⲛ .... <text:line-break/><text:span text:style-name="T1"> </text:span><text:span text:style-name="T2">(66/7) </text:span> [..]ⲙ̣ⲉⲣⲟⲥ ⲧⲏⲣ[....... <text:line-break/><text:span text:style-name="T1"> </text:span><text:span text:style-name="T2">(66/8) </text:span> [.]ⲡ’̣ ⲛϩⲣⲁⲓ̈ ϩⲛ ⲟⲩ[...... <text:line-break/><text:span text:style-name="T1"> </text:span><text:span text:style-name="T2">(66/9) </text:span> ⲥⲟⲩⲱⲛⲥ ⲉⲥ.[....... <text:line-break/><text:span text:style-name="T1"> </text:span><text:span text:style-name="T2">(66/10) </text:span> [..]ⲩⲉ ⲉⲃⲟⲗ ⲙⲙ[ⲟϥ ⲡⲉ] <text:line-break/><text:span text:style-name="T1"> </text:span><text:span text:style-name="T2">(66/11) </text:span> [..].ⲟⲩ ⲉⲧ’ϣⲟ̣[ⲟⲡ’ ⲟⲛ]‐ <text:line-break/><text:span text:style-name="T1"> </text:span><text:span text:style-name="T2">(66/12) </text:span> ⲧⲱⲥ ⲉⲧⲉ ⲉⲃⲟⲗ ⲙⲙⲟϥ̣ [ⲙ] <text:line-break/><text:span text:style-name="T1"> </text:span><text:span text:style-name="T2">(66/13) </text:span> ⲡⲓⲡ̅ⲛ̅ⲁ̅ ⲉⲧ’ϣⲟⲟⲡ’ ⲟⲛ[ⲧⲱⲥ] <text:line-break/><text:span text:style-name="T1"> </text:span><text:span text:style-name="T2">(66/14) </text:span> ⲡⲓⲟⲩⲁ ⲙⲁⲩⲁⲁϥ ⲛ ϣ[.. <text:line-break/><text:span text:style-name="T1"> </text:span><text:span text:style-name="T2">(66/15) </text:span> ϭⲟⲙ ⲅⲁⲣ ⲛⲉ ⲛⲧⲉ ϥ̣[... <text:line-break/><text:span text:style-name="T1"> </text:span><text:span text:style-name="T2">(66/16) </text:span> ⲛⲁⲥ· ϯϩⲩⲡⲁⲣⲝⲓⲥ .[.. <text:line-break/><text:span text:style-name="T1"> </text:span><text:span text:style-name="T2">(66/17) </text:span> ⲡ̣ⲱⲛϩ ⲇⲉ ⲙⲛ ϯⲙⲛⲧ’̣[ⲙⲁ]‐ <text:line-break/><text:span text:style-name="T1"> </text:span><text:span text:style-name="T2">(66/18) </text:span> ⲕⲁⲣⲓⲟⲥ· ⲁⲩⲱ ⲛϩⲣ[ⲁⲓ̈ ϩⲛ] <text:line-break/><text:span text:style-name="T1"> </text:span><text:span text:style-name="T2">(66/19) </text:span> ϯϩⲩⲡⲁⲣⲝⲓⲥ ϥϣⲟⲟⲡ’̣[ <text:line-break/><text:span text:style-name="T1"> </text:span><text:span text:style-name="T2">(66/20) </text:span> ⲟⲩⲁⲡⲉ ⲛ ϩⲁⲡⲗⲟⲩⲛ ⲟⲩ[ϣⲁ]‐ <text:line-break/><text:soft-page-break/><text:span text:style-name="T1"> </text:span><text:span text:style-name="T2">(66/21) </text:span> ϫⲉ ⲛⲧⲁϥ ⲙⲛ ⲟⲩⲉⲓⲇⲟ̣[ⲥ] <text:line-break/><text:span text:style-name="T1"> </text:span><text:span text:style-name="T2">(66/22) </text:span> ⲁⲩⲱ ⲡⲏ ⲉⲧϥⲛⲁϭⲓⲛ[ⲉ ⲙ]‐ <text:line-break/><text:span text:style-name="T1"> </text:span><text:span text:style-name="T2">(66/23) </text:span> ⲙⲁϥ ϣⲁϥⲧⲣⲉϥϣⲱ̣[ⲡⲉ] <text:line-break/><text:span text:style-name="T1"> </text:span><text:span text:style-name="T2">(66/24) </text:span> ⲉϥϣⲟⲟⲡ’ ⲛϩⲣⲁⲓ ⲇ[ⲉ ϩⲛ] <text:line-break/><text:span text:style-name="T1"> </text:span><text:span text:style-name="T2">(66/25) </text:span> ϯⲙⲛⲧ’ⲱⲛϩ ϥⲟⲛϩ ⲁ[ <text:line-break/><text:span text:style-name="T1"> </text:span><text:span text:style-name="T2">(67/1) </text:span> [.....] ⲛ̣[ϩ]ⲣⲁⲓ̈ [ <text:line-break/><text:span text:style-name="T1"> </text:span><text:span text:style-name="T2">(67/2) </text:span> [....]ⲓⲟⲥ ϥϣ.[..] ϫ ⲉⲩⲛ‐ <text:line-break/><text:span text:style-name="T1"> </text:span><text:span text:style-name="T2">(67/3) </text:span> [ⲧⲁϥ ⲙⲙ]ⲁⲩ ⲛ ⲟⲩ ⲙ̣[ⲛ]ⲧ’[ⲉⲓⲙⲉ̣ <text:line-break/><text:span text:style-name="T1"> </text:span><text:span text:style-name="T2">(67/4) </text:span> [.....]ⲙⲙⲉ ⲉ ⲛⲁⲓ̈ ⲧⲏⲣⲟ[ⲩ <text:line-break/><text:span text:style-name="T1"> </text:span><text:span text:style-name="T2">(67/5) </text:span> [....].ⲡⲉ ⲉⲣⲟϥ ⲙⲁⲩⲁⲁ[ϥ <text:line-break/><text:span text:style-name="T1"> </text:span><text:span text:style-name="T2">(67/6) </text:span> [.......] ⲡ̣ⲛⲟⲩⲧⲉ ⲅⲁⲣ [ <text:line-break/><text:span text:style-name="T1"> </text:span><text:span text:style-name="T2">(67/7) </text:span> [.......]ⲁ̣ⲩ ⲉⲓⲙⲏⲧⲓ ⲉ̣[ <text:line-break/><text:span text:style-name="T1"> </text:span><text:span text:style-name="T2">(67/8) </text:span> [...... ⲙ]ⲁ̣ⲩⲁⲁϥ· ⲁⲩⲱ ϥϣ[ <text:line-break/><text:span text:style-name="T1"> </text:span><text:span text:style-name="T2">(67/9) </text:span> [.......] ⲛϩⲣⲁⲓ̈ ⲛϩⲏⲧϥ [ <text:line-break/><text:span text:style-name="T1"> </text:span><text:span text:style-name="T2">(67/10) </text:span> [.......]· ⲡⲓⲟⲩⲱⲧ’ ⲛ̣ [ <text:line-break/><text:span text:style-name="T1"> </text:span><text:span text:style-name="T2">(67/11) </text:span> [.......]ⲁ· ⲉϥϣⲟⲟⲡ’ ⲅⲁⲣ ⲛ [ <text:line-break/><text:span text:style-name="T1"> </text:span><text:span text:style-name="T2">(67/12) </text:span> [ϩⲣⲁⲓ̈ ϩ]ⲙ ⲡⲉⲧⲉ ⲡⲱϥ ⲉⲧ’ϣⲟ‐ <text:line-break/><text:span text:style-name="T1"> </text:span><text:span text:style-name="T2">(67/13) </text:span> [ⲟⲡ’ ⲛ] ⲟ̣ⲩⲉⲓⲇⲉⲁ ⲛⲧⲉ ⲟⲩⲉⲓⲇⲉⲁ̣ <text:line-break/><text:span text:style-name="T1"> </text:span><text:span text:style-name="T2">(67/14) </text:span> [...]ⲧ’ ⲟⲩⲱⲧ’ ⲛⲧⲉ ϯϩⲉⲛ‐ <text:line-break/><text:span text:style-name="T1"> </text:span><text:span text:style-name="T2">(67/15) </text:span> [....] ⲁ̣ⲩⲱ ⲉϥϣⲟⲟⲡ’ ⲙ ⲡ[‐ <text:line-break/><text:span text:style-name="T1"> </text:span><text:span text:style-name="T2">(67/16) </text:span> [....] ⲉϥⲛϩⲣⲁⲓ̈ ⲛϩⲏⲧϥ ϩⲙ <text:line-break/><text:span text:style-name="T1"> </text:span><text:span text:style-name="T2">(67/17) </text:span> [ⲡⲓⲛ]ⲟⲩⲥ ⲁⲩⲱ ϥⲛϩⲣⲁⲓ̈ ⲛϩⲏ̣‐ <text:line-break/><text:span text:style-name="T1"> </text:span><text:span text:style-name="T2">(67/18) </text:span> [ⲧ]ϥ̣ ⲉϥⲛⲛⲏⲩ ⲉⲃⲟⲗ ⲉ ⲗⲁⲁⲩ <text:line-break/><text:span text:style-name="T1"> </text:span><text:span text:style-name="T2">(67/19) </text:span> ⲙ̣ ⲙⲁ ⲁⲛ ⲉⲩⲡⲛ̅ⲁ̅ ⲛ ⲟⲩⲱⲧ’ <text:line-break/><text:span text:style-name="T1"> </text:span><text:span text:style-name="T2">(67/20) </text:span> [ⲡ]ⲉ ⲛ ⲧⲉⲗⲓⲟⲥ ⲛ ϩⲁⲡⲗⲟⲩⲛ <text:line-break/><text:span text:style-name="T1"> </text:span><text:span text:style-name="T2">(67/21) </text:span> [ⲉⲩ]ⲧⲟⲡⲟⲥ ⲛⲧⲁϥ ⲡⲉ ⲙⲛ <text:line-break/><text:span text:style-name="T1"> </text:span><text:span text:style-name="T2">(67/22) </text:span> [...] ⲉϥϣⲱⲡⲉ ϩⲣⲁⲓ̈ ⲛϩⲏⲧϥ <text:line-break/><text:span text:style-name="T1"> </text:span><text:span text:style-name="T2">(67/23) </text:span> [ⲁⲩ]ⲱ ⲛⲓⲧⲏⲣⲟⲩ· ⲁⲩⲱ <text:line-break/><text:span text:style-name="T1"> </text:span><text:span text:style-name="T2">(67/24) </text:span> [ⲉϥϣ]ⲟⲟⲡ’ ⲛⲧⲟϥ ⲛϭⲓ ⲡⲉⲧ’‐ <text:line-break/><text:span text:style-name="T1"> </text:span><text:span text:style-name="T2">(68/1) </text:span> [........]...[..]ⲡ̣[ <text:line-break/><text:span text:style-name="T1"> </text:span><text:span text:style-name="T2">(68/2) </text:span> [........] ⲙⲛ ⲟ̣ⲩⲱ̣[ <text:line-break/><text:span text:style-name="T1"> </text:span><text:span text:style-name="T2">(68/3) </text:span> ⲁⲩⲱ̣ [ⲟ]ⲩⲣⲉϥϣⲱⲡ [ⲛϩⲣⲁⲓ̈] <text:line-break/><text:span text:style-name="T1"> </text:span><text:span text:style-name="T2">(68/4) </text:span> ⲛϩⲏⲧ[ϥ ʹ264] ⲡⲓⲱⲛϩ ⲇ[ⲉ <text:line-break/><text:span text:style-name="T1"> </text:span><text:span text:style-name="T2">(68/5) </text:span> [ⲉⲛ]ⲉ̣ⲣⲅⲓⲁ ⲇⲉ ⲛⲧⲉ ϯ[ <text:line-break/><text:span text:style-name="T1"> </text:span><text:span text:style-name="T2">(68/6) </text:span> [.]ⲥ ⲛⲛ ⲁⲧⲟⲩⲥⲓⲁ̣· ⲡ[ <text:line-break/><text:span text:style-name="T1"> </text:span><text:span text:style-name="T2">(68/7) </text:span> [ⲉ]ⲧ’ϣⲟⲟⲡ’ ⲛϩⲏ̣[ⲧϥ <text:line-break/><text:span text:style-name="T1"> </text:span><text:span text:style-name="T2">(68/8) </text:span> [ϣⲟ]ⲟⲡ’ ⲛϩⲏⲧϥ [ <text:line-break/><text:span text:style-name="T1"> </text:span><text:span text:style-name="T2">(68/9) </text:span> ϣⲟⲟⲡ’ ⲉⲧⲃⲏⲏⲧ̣[ϥ <text:line-break/><text:span text:style-name="T1"> </text:span><text:span text:style-name="T2">(68/10) </text:span> ⲙⲁⲕⲁⲣⲓⲟⲥ ⲙⲛ ⲟ[ⲩ <text:line-break/><text:span text:style-name="T1"> </text:span><text:span text:style-name="T2">(68/11) </text:span> [ⲧ]ⲉⲗⲓⲟⲥ· ⲁⲩⲱ [ <text:line-break/><text:span text:style-name="T1"> </text:span><text:span text:style-name="T2">(68/12) </text:span> [ⲉ]ⲧ’ϣⲟⲟⲡ’ ϩⲛ [ <text:line-break/><text:span text:style-name="T1"> </text:span><text:span text:style-name="T2">(68/13) </text:span> ⲉⲧ’ϣⲟⲟⲡ’ ⲟⲛⲧⲱ̣ⲥ̣ [ⲟⲩ]‐ <text:line-break/><text:span text:style-name="T1"> </text:span><text:span text:style-name="T2">(68/14) </text:span> ⲙⲁⲕⲁⲣⲓⲟⲥ ⲧⲉ ϯⲉⲓⲇ[ⲉⲁ] <text:line-break/><text:span text:style-name="T1"> </text:span><text:span text:style-name="T2">(68/15) </text:span> ⲛⲧⲉ ϯⲉⲛⲉⲣⲅⲓⲁ ⲉⲧ’[ϣⲟ]‐ <text:line-break/><text:span text:style-name="T1"> </text:span><text:span text:style-name="T2">(68/16) </text:span> ⲟⲡ’ ⲉϣⲁϥϫⲓ ⲛ ϯϩⲩⲡ[ⲁⲣ]‐ <text:line-break/><text:span text:style-name="T1"> </text:span><text:span text:style-name="T2">(68/17) </text:span> ⲝⲓⲥ· ϣⲁϥϫⲓ ϭⲟⲙ ⲡ[ <text:line-break/><text:span text:style-name="T1"> </text:span><text:span text:style-name="T2">(68/18) </text:span> ⲟⲩⲙⲛⲧ’ⲧⲉⲗⲓⲟⲥ ⲉⲙ[ <text:line-break/><text:soft-page-break/><text:span text:style-name="T1"> </text:span><text:span text:style-name="T2">(68/19) </text:span> ⲡⲱⲣϫ ⲉⲃⲟⲗ ⲉⲛⲉϩ· ⲧⲟ[ⲧⲉ] <text:line-break/><text:span text:style-name="T1"> </text:span><text:span text:style-name="T2">(68/20) </text:span> ϥϣⲟⲟⲡ’ ⲛ ⲧⲉⲗⲓⲟⲥ· ⲉⲧⲃ̣[ⲉ] <text:line-break/><text:span text:style-name="T1"> </text:span><text:span text:style-name="T2">(68/21) </text:span> ⲡⲁⲓ̈ ϥϣⲟⲟⲡ’ ⲛ ⲧⲉⲗⲓⲟⲥ <text:line-break/><text:span text:style-name="T1"> </text:span><text:span text:style-name="T2">(68/22) </text:span> ⲉϥⲉ ⲛⲛ ⲁⲧ’ⲡⲱⲣϫ ⲉⲣⲟϥ <text:line-break/><text:span text:style-name="T1"> </text:span><text:span text:style-name="T2">(68/23) </text:span> ⲙⲛ ⲡⲉϥⲥⲁ ⲙⲙⲓⲛ ⲙⲙⲟϥ̣ <text:line-break/><text:span text:style-name="T1"> </text:span><text:span text:style-name="T2">(68/24) </text:span> ⲙⲙⲛ ⲗⲁⲁⲩ ⲅⲁⲣ ⲉϥϣ̣[ⲟ]‐ <text:line-break/><text:span text:style-name="T1"> </text:span><text:span text:style-name="T2">(68/25) </text:span> ⲟⲡ’ ϩⲁ ⲧⲉϥⲉϩⲏ ⲉⲓⲙⲏ[ⲧⲓ] <text:line-break/><text:span text:style-name="T1"> </text:span><text:span text:style-name="T2">(68/26) </text:span> ϯⲙⲛⲧ’ⲟⲩⲱⲧ’ ⲛ ⲧⲉ̣[ⲗⲓⲟⲥ] <text:line-break/><text:span text:style-name="T1"> </text:span><text:span text:style-name="T2">(69/1) </text:span> (Page 69 does not survive. It was probably a blank, <text:line-break/><text:span text:style-name="T1"> </text:span><text:span text:style-name="T2">(69/2) </text:span> but was counted in the paging.) <text:line-break/><text:span text:style-name="T1"> </text:span><text:span text:style-name="T2">(70/1) </text:span> (Page 70 does not survive. It was probably a blank, <text:line-break/><text:span text:style-name="T1"> </text:span><text:span text:style-name="T2">(70/2) </text:span> but was counted in the paging.) <text:line-break/><text:span text:style-name="T1"> </text:span><text:span text:style-name="T2">(71/1) </text:span> (Page 71 is blank; it may have had pagination.) <text:line-break/><text:span text:style-name="T1"> </text:span><text:span text:style-name="T2">(72/1) </text:span> (Page 72 is blank; it may have had pagination.) <text:line-break/><text:span text:style-name="T1"> </text:span><text:span text:style-name="T2">(73/1) </text:span> [.....]ϩⲩⲡⲁⲣ[ⲝⲓⲥ <text:line-break/><text:span text:style-name="T1"> </text:span><text:span text:style-name="T2">(73/2) </text:span> [....].ⲟ[ⲩ]ϫⲁⲓ̈ ⲧⲉ ⲛ [ <text:line-break/><text:span text:style-name="T1"> </text:span><text:span text:style-name="T2">(73/3) </text:span> [.ⲧⲏ]ⲣⲟⲩ[·] ⲁⲩⲱ ⲡⲏ ⲉ̣[ <text:line-break/><text:span text:style-name="T1"> </text:span><text:span text:style-name="T2">(73/4) </text:span> [...]ϣϭⲟⲙ ⲟⲩⲇⲉ ⲛϥ[ <text:line-break/><text:span text:style-name="T1"> </text:span><text:span text:style-name="T2">(73/5) </text:span> [...]ⲟⲟϥ· ⲉϣⲱⲡⲉ ⲉϥ̣[ϣⲁⲛ]‐ <text:line-break/><text:span text:style-name="T1"> </text:span><text:span text:style-name="T2">(73/6) </text:span> [...]ⲛ̣ⲧϥ ⲛⲁϥ ⲛⲁⲓ̈ ⲧⲏⲣ[ⲟⲩ] <text:line-break/><text:span text:style-name="T1"> </text:span><text:span text:style-name="T2">(73/7) </text:span> [...] ⲉⲃⲟⲗ· ⲡⲏ ⲅⲁⲣ ⲉⲧ’̣[ <text:line-break/><text:span text:style-name="T1"> </text:span><text:span text:style-name="T2">(73/8) </text:span> [....] ϩ̣ⲛ ϯϩⲩⲡⲁⲣⲝⲓⲥ̣ <text:line-break/><text:span text:style-name="T1"> </text:span><text:span text:style-name="T2">(73/9) </text:span> [..] ⲡ̣ⲁⲓ̈ ⲡⲁⲛⲧⲱⲥ ϥϣ̣ⲟ̣‐ <text:line-break/><text:span text:style-name="T1"> </text:span><text:span text:style-name="T2">(73/10) </text:span> [ⲟⲡ’] ⲙ ⲡⲓⲱⲛϩ· ϩⲛ ϯⲙⲛⲧ’̣‐ <text:line-break/><text:span text:style-name="T1"> </text:span><text:span text:style-name="T2">(73/11) </text:span> [ⲙⲁ]ⲕⲁⲣⲓⲟⲥ ⲇⲉ ϥⲓⲙⲉ· ⲁⲩⲱ̣ <text:line-break/><text:span text:style-name="T1"> </text:span><text:span text:style-name="T2">(73/12) </text:span> [ⲉϣ]ⲱⲡ’ ⲉϥϣⲁⲛϫⲓ ⲙⲛ ⲛⲓ‐ <text:line-break/><text:span text:style-name="T1"> </text:span><text:span text:style-name="T2">(73/13) </text:span> [ⲉⲟ]ⲟ̣ⲩ ⲟⲩⲧⲉⲗⲓⲟⲥ ⲡⲉ· <text:line-break/><text:span text:style-name="T1"> </text:span><text:span text:style-name="T2">(73/14) </text:span> [ⲉϣ]ⲱⲡⲉ ⲇⲉ ⲉϥϣⲁⲛϫⲓ ⲙⲛ <text:line-break/><text:span text:style-name="T1"> </text:span><text:span text:style-name="T2">(73/15) </text:span> [ⲥⲛⲁ]ⲩ ⲏ%0 ⲟⲩⲁ· ⲟⲩϯϩⲉ ⲡⲉ <text:line-break/><text:span text:style-name="T1"> </text:span><text:span text:style-name="T2">(73/16) </text:span> [ⲙ ⲡ]ⲣⲏⲧⲉ ⲉⲧⲁϥϫⲓ ⲉⲃⲟⲗ <text:line-break/><text:span text:style-name="T1"> </text:span><text:span text:style-name="T2">(73/17) </text:span> [ⲙⲙ]ⲟϥ· ⲉⲩϣⲟⲟⲡ’ ⲉⲧⲃⲉ <text:line-break/><text:span text:style-name="T1"> </text:span><text:span text:style-name="T2">(73/18) </text:span> [ⲡⲁ]ⲓ̣̈ ⲛϭⲓ ⲛⲏ ⲉⲧⲉ ⲟⲩⲛ ⲯⲩⲭⲏ <text:line-break/><text:span text:style-name="T1"> </text:span><text:span text:style-name="T2">(73/19) </text:span> [ⲛϩ]ⲏⲧⲟⲩ ⲙⲛ ⲛⲓⲁⲧ’ⲯⲩⲭⲏ· <text:line-break/><text:span text:style-name="T1"> </text:span><text:span text:style-name="T2">(73/20) </text:span> [ⲉⲧ]ⲃⲉ ⲡⲁⲓ̈ ⲛⲏ ⲉⲧⲛⲉⲛⲟⲩ‐ <text:line-break/><text:span text:style-name="T1"> </text:span><text:span text:style-name="T2">(73/21) </text:span> [ϩⲙ] ⲉ̣ⲧⲃⲉ ⲡⲁⲓ̈ ⲛⲏ ⲉⲧⲛⲁ‐ <text:line-break/><text:span text:style-name="T1"> </text:span><text:span text:style-name="T2">(73/22) </text:span> [ⲧⲁ]ⲕⲟ· ⲉϣⲱⲡⲉ ⲉⲙⲡⲟⲩ‐ <text:line-break/><text:span text:style-name="T1"> </text:span><text:span text:style-name="T2">(73/23) </text:span> [ϫⲓ ⲉ]ⲃⲟⲗ ⲙⲙⲟϥ· ⲉⲧⲃⲉ <text:line-break/><text:span text:style-name="T1"> </text:span><text:span text:style-name="T2">(73/24) </text:span> [ⲡⲁ]ⲓ̈ ⲟⲩϩⲩⲗⲏ ⲧⲉ ⲙⲛ ϩⲉⲛ‐ <text:line-break/><text:span text:style-name="T1"> </text:span><text:span text:style-name="T2">(73/25) </text:span> [ⲥ]ⲱ̣ⲙⲁ· ⲉⲧⲃⲉ ⲡⲁⲓ̈ ⲟⲩⲁⲧ’‐ <text:line-break/><text:span text:style-name="T1"> </text:span><text:span text:style-name="T2">(74/1) </text:span> [......]ⲩ̣ⲛⲟⲩⲁ[ <text:line-break/><text:span text:style-name="T1"> </text:span><text:span text:style-name="T2">(74/2) </text:span> [ⲉⲧ]ⲃⲉ ⲡⲁⲓ̈ ⲉⲑ̣[.]ⲉ̣[ <text:line-break/><text:span text:style-name="T1"> </text:span><text:span text:style-name="T2">(74/3) </text:span> [..]ⲟⲩ [ⲧ]ⲏⲣϥ [.] ⲉⲧⲃⲉ̣[ <text:line-break/><text:span text:style-name="T1"> </text:span><text:span text:style-name="T2">(74/4) </text:span> [.].ⲣⲟ. ⲡⲁⲓ̈ [.]ⲉ̣ⲧⲣ ϣ[ⲣⲡ’ ⲛ] <text:line-break/><text:span text:style-name="T1"> </text:span><text:span text:style-name="T2">(74/5) </text:span> [ϣ]ⲟⲟⲡ’· ⲁⲩ̣ⲱ ⲉϥ.[ <text:line-break/><text:span text:style-name="T1"> </text:span><text:span text:style-name="T2">(74/6) </text:span> [.]ⲩ̣ⲉ ⲟⲩⲁⲡⲉ ⲛ ϩⲁⲡ[ⲗⲟⲩⲛ <text:line-break/><text:span text:style-name="T1"> </text:span><text:span text:style-name="T2">(74/7) </text:span> [..]ⲡⲛ̅ⲁ̅ ⲟⲩⲱⲧ’ ⲉ̣[ <text:line-break/><text:span text:style-name="T1"> </text:span><text:span text:style-name="T2">(74/8) </text:span> ⲣ[..] ⲉⲣⲟϥ ⲡⲉ· ⲁⲩⲱ̣ [ ϩⲩ]‐ <text:line-break/><text:soft-page-break/><text:span text:style-name="T1"> </text:span><text:span text:style-name="T2">(74/9) </text:span> ⲡⲁⲣⲝⲓⲥ ϯⲉⲓⲇⲉⲁ [ <text:line-break/><text:span text:style-name="T1"> </text:span><text:span text:style-name="T2">(74/10) </text:span> [.]ⲉ ⲛⲧⲁϥ· ⲁⲩⲱ ⲕⲁ[ⲧⲁ ϯⲉ]‐ <text:line-break/><text:span text:style-name="T1"> </text:span><text:span text:style-name="T2">(74/11) </text:span> [ⲛ]ⲉⲣⲅⲓⲁ ⲉⲧⲉ ⲡⲓⲱⲛϩ [ <text:line-break/><text:span text:style-name="T1"> </text:span><text:span text:style-name="T2">(74/12) </text:span> ⲡⲉ· ⲁⲩⲱ ⲕⲁⲧⲁ ϯⲙⲛ[ⲧ’ⲧⲉ]‐ <text:line-break/><text:span text:style-name="T1"> </text:span><text:span text:style-name="T2">(74/13) </text:span> ⲗⲓⲟⲥ ⲉⲧⲉ ϯϭⲟⲙ ⲧ[ⲉ ⲛ ⲛⲟ]‐ <text:line-break/><text:span text:style-name="T1"> </text:span><text:span text:style-name="T2">(74/14) </text:span> ⲉⲣⲟⲛ ⲉⲩⲟⲩⲟⲉⲓⲛ ⲧ[ⲉ <text:line-break/><text:span text:style-name="T1"> </text:span><text:span text:style-name="T2">(74/15) </text:span> ⲡⲓϣⲟⲙⲧ’ ⲉϥⲁϩⲉⲣⲁⲧ̣[ϥ ϩⲓ ⲟⲩ]‐ <text:line-break/><text:span text:style-name="T1"> </text:span><text:span text:style-name="T2">(74/16) </text:span> ⲥⲟⲡ’ ⲉϥⲕⲓⲙ ϩⲓ ⲟⲩⲥ̣[ⲟⲡ’] <text:line-break/><text:span text:style-name="T1"> </text:span><text:span text:style-name="T2">(74/17) </text:span> ⲛϩⲣⲁⲓ̈ ϩⲙ ⲙⲁ ⲛⲓⲙ ⲁⲩ̣[ⲱ ϩⲣⲁⲓ̈] <text:line-break/><text:span text:style-name="T1"> </text:span><text:span text:style-name="T2">(74/18) </text:span> ϩⲛ ⲗⲁⲁⲩ ⲙ ⲙⲁ ⲁⲛ ⲉϥ[ <text:line-break/><text:span text:style-name="T1"> </text:span><text:span text:style-name="T2">(74/19) </text:span> ⲛⲁⲩ ⲧⲏⲣⲟⲩ ⲁⲩⲱ ⲉϥ[ⲣ ⲉ]‐ <text:line-break/><text:span text:style-name="T1"> </text:span><text:span text:style-name="T2">(74/20) </text:span> ⲛⲉⲣⲅⲓ ⲡⲓⲁⲧ’ϣⲁϫⲉ ⲙ[ⲙⲟϥ] <text:line-break/><text:span text:style-name="T1"> </text:span><text:span text:style-name="T2">(74/21) </text:span> ⲛ ⲁⲧ’ϯ ⲣⲁⲛ ⲉⲣⲟϥ· ⲛ [ <text:line-break/><text:span text:style-name="T1"> </text:span><text:span text:style-name="T2">(74/22) </text:span> ϣⲟⲟⲡ’ ⲉⲃⲟⲗ ⲙⲙⲟϥ [ <text:line-break/><text:span text:style-name="T1"> </text:span><text:span text:style-name="T2">(74/23) </text:span> ⲙⲉ ⲉϥⲙⲟⲧⲛ ⲙⲙⲟϥ ⲛ̣[ <text:line-break/><text:span text:style-name="T1"> </text:span><text:span text:style-name="T2">(74/24) </text:span> ϩⲛ ⲧⲉϥⲙⲛⲧ’ⲧⲉⲗⲓⲟⲥ̣ [ ⲙ]‐ <text:line-break/><text:span text:style-name="T1"> </text:span><text:span text:style-name="T2">(74/25) </text:span> ⲡϥϫⲓ ⲉⲃⲟⲗ ϩⲙ ⲙⲟⲣⲫ̣[ⲏ ⲛⲓⲙ <text:line-break/><text:span text:style-name="T1"> </text:span><text:span text:style-name="T2">(75/1) </text:span> [ⲉⲧ]ⲃⲉ ⲡⲁⲓ̣̈ [ <text:line-break/><text:span text:style-name="T1"> </text:span><text:span text:style-name="T2">(75/2) </text:span> [.].ⲟⲩ.[........]ʹ264[.. <text:line-break/><text:span text:style-name="T1"> </text:span><text:span text:style-name="T2">(75/3) </text:span> [...]ⲧⲩ[.....].ⲟⲩ[.. <text:line-break/><text:span text:style-name="T1"> </text:span><text:span text:style-name="T2">(75/4) </text:span> [..] ⲛ ⲗⲁ[ⲁⲩ ...]ⲉⲛⲏⲥ̣[. <text:line-break/><text:span text:style-name="T1"> </text:span><text:span text:style-name="T2">(75/5) </text:span> [...]ⲡ[......]ⲟⲥ ⲙⲛ [. <text:line-break/><text:span text:style-name="T1"> </text:span><text:span text:style-name="T2">(75/6) </text:span> [...]ⲟ̣[...].ⲁⲡ̣ⲁ̣ⲡⲓʹ264.[. <text:line-break/><text:span text:style-name="T1"> </text:span><text:span text:style-name="T2">(75/7) </text:span> [......] ϩⲛ ϯϩⲩⲡⲁⲣⲝ[ⲓⲥ <text:line-break/><text:span text:style-name="T1"> </text:span><text:span text:style-name="T2">(75/8) </text:span> [.....]ϣⲟⲟⲡ’ ϩⲛ ϯⲙⲛⲧ’‐ <text:line-break/><text:span text:style-name="T1"> </text:span><text:span text:style-name="T2">(75/9) </text:span> [...] ⲛⲧⲉ ⲡⲓⲱⲛϩ· ϩⲛ ϯ̅ <text:line-break/><text:span text:style-name="T1"> </text:span><text:span text:style-name="T2">(75/10) </text:span> [ⲙⲛⲧ’]ⲧⲉⲗⲓⲟⲥ ⲇⲉ ⲙⲛ ϯⲙⲛ̣[ⲧ’]‐ <text:line-break/><text:span text:style-name="T1"> </text:span><text:span text:style-name="T2">(75/11) </text:span> [ⲙ]ⲉ· ϯⲙⲛⲧ’ⲙⲁⲕⲁⲣⲓⲟ̣ⲥ̣ <text:line-break/><text:span text:style-name="T1"> </text:span><text:span text:style-name="T2">(75/12) </text:span> [ⲛⲁⲓ̈ ⲧ]ⲏⲣⲟⲩ ⲇⲉ ⲛⲉⲩϣⲟⲟⲡ’ <text:line-break/><text:span text:style-name="T1"> </text:span><text:span text:style-name="T2">(75/13) </text:span> [ϩⲛ ϯ]ⲙ̣ⲛⲧ’ⲁⲧ’ⲡⲱⲣϫ ⲛⲧⲉ <text:line-break/><text:span text:style-name="T1"> </text:span><text:span text:style-name="T2">(75/14) </text:span> [ⲡⲓ]ⲡⲛ̅ⲁ̅· ϯⲙⲛⲧ’ⲉⲓⲙⲉ ⲇⲉ <text:line-break/><text:span text:style-name="T1"> </text:span><text:span text:style-name="T2">(75/15) </text:span> [...] ⲉⲧⲃⲏⲏⲧⲥ ⲡⲉ ϯⲙⲛⲧ’‐ <text:line-break/><text:span text:style-name="T1"> </text:span><text:span text:style-name="T2">(75/16) </text:span> [ⲛⲟ]ⲩⲧⲉ ⲙⲛ ϯⲙⲛⲧ’ⲁⲧⲟⲩ‐ <text:line-break/><text:span text:style-name="T1"> </text:span><text:span text:style-name="T2">(75/17) </text:span> [..]ⲁ ⲁⲩⲱ ϯⲙⲛⲧ’ⲙⲁⲕⲁ‐ <text:line-break/><text:span text:style-name="T1"> </text:span><text:span text:style-name="T2">(75/18) </text:span> [ⲣⲓⲟ]ⲥ ⲙⲛ ⲡⲓⲱⲛϩ· ⲁⲩⲱ ϯ‐ <text:line-break/><text:span text:style-name="T1"> </text:span><text:span text:style-name="T2">(75/19) </text:span> [ⲙⲛ]ⲧ’ⲉⲓⲙⲉ ⲙⲛ ϯⲙⲛⲧ’ⲁⲅⲁ‐ <text:line-break/><text:span text:style-name="T1"> </text:span><text:span text:style-name="T2">(75/20) </text:span> ⲑ̣ⲟ̣ⲥ· ⲁⲩⲱ ⲟⲩϩⲉⲛⲛⲁⲥ <text:line-break/><text:span text:style-name="T1"> </text:span><text:span text:style-name="T2">(75/21) </text:span> ⲙ[ⲛ] ⲟⲩⲙⲛⲧ’ⲟⲩⲱⲧ’· ⲁⲩⲱ <text:line-break/><text:span text:style-name="T1"> </text:span><text:span text:style-name="T2">(75/22) </text:span> ϩ[ⲁ]ⲡⲗⲱⲥ ⲛⲁⲓ̈ ⲧⲏⲣⲟⲩ ⲡⲓ‐ <text:line-break/><text:span text:style-name="T1"> </text:span><text:span text:style-name="T2">(75/23) </text:span> ⲧ[ⲃ]ⲃ̣ⲟ ⲛⲧⲉ ϯⲙⲛⲧ’ⲁⲧⲙⲓⲥⲉ <text:line-break/><text:span text:style-name="T1"> </text:span><text:span text:style-name="T2">(75/24) </text:span> [..]ⲣ ϣⲟⲣⲡ’ ⲛ ϣⲟⲟⲡ’ ⲛⲁϥ <text:line-break/><text:span text:style-name="T1"> </text:span><text:span text:style-name="T2">(75/25) </text:span> [..]ⲓ ⲛⲁⲓ̈ ⲧⲏⲣⲟⲩ ⲙⲛ ⲡⲓ‐ <text:line-break/><text:span text:style-name="T1"> </text:span><text:span text:style-name="T2">(76/1) </text:span> [ ]ⲛⲉϥⲙ[ <text:line-break/><text:span text:style-name="T1"> </text:span><text:span text:style-name="T2">(76/2) </text:span> [ ϩⲣⲁ]ⲓ̈ ϩⲛ ⲛ̣[ <text:line-break/><text:span text:style-name="T1"> </text:span><text:span text:style-name="T2">(76/3) </text:span> [...].[........]ⲟⲗ.[ <text:line-break/><text:span text:style-name="T1"> </text:span><text:span text:style-name="T2">(76/4) </text:span> [...]ⲧⲁ[......] ⲙ ⲡⲣ[ <text:line-break/><text:span text:style-name="T1"> </text:span><text:span text:style-name="T2">(76/5) </text:span> [..]ⲟⲩⲥ ϯ[.....]ⲩⲥ ⲡ[ <text:line-break/><text:soft-page-break/><text:span text:style-name="T1"> </text:span><text:span text:style-name="T2">(76/6) </text:span> [...]ⲩⲟⲉⲓ[ⲛ] ⲉ[....]ⲉⲩ̣[ <text:line-break/><text:span text:style-name="T1"> </text:span><text:span text:style-name="T2">(76/7) </text:span> [ⲟ]ⲩⲁⲓⲱⲛ ⲟⲩϭ.[ <text:line-break/><text:span text:style-name="T1"> </text:span><text:span text:style-name="T2">(76/8) </text:span> ⲛ̣[ϩ]ⲣⲁⲓ̈ ϩⲛ ⲟⲩⲙⲉ[ <text:line-break/><text:span text:style-name="T1"> </text:span><text:span text:style-name="T2">(76/9) </text:span> ⲙⲛⲧ’ⲁⲧ’ⲙⲓⲥⲉ· ⲉϥ̣ϣ̣[ <text:line-break/><text:span text:style-name="T1"> </text:span><text:span text:style-name="T2">(76/10) </text:span> ⲁ̣ⲣ ⲛ ⲟⲩⲁⲉⲓϣ ⲛⲓⲙ ⲁϥ̣[ <text:line-break/><text:span text:style-name="T1"> </text:span><text:span text:style-name="T2">(76/11) </text:span> [ⲛ]ⲥⲱϥ ⲉϥⲛⲁⲩ ⲉⲣⲟϥ .[ <text:line-break/><text:span text:style-name="T1"> </text:span><text:span text:style-name="T2">(76/12) </text:span> ⲁⲩⲱ ⲉϥϣⲟⲟⲡ’ ⲉⲟⲩ̣[ⲁ ⲡⲉ] <text:line-break/><text:span text:style-name="T1"> </text:span><text:span text:style-name="T2">(76/13) </text:span> ⲛ ϩⲁⲡⲗⲟⲩⲛ· ⲉⲩⲙⲛ[ⲧ’ⲙⲁ]‐ <text:line-break/><text:span text:style-name="T1"> </text:span><text:span text:style-name="T2">(76/14) </text:span> ⲕⲁⲣⲓⲟⲥ ⲡⲉ ⲛϩⲣⲁⲓ̈ ϩⲛ ⲟ[ⲩ]‐ <text:line-break/><text:span text:style-name="T1"> </text:span><text:span text:style-name="T2">(76/15) </text:span> ⲙⲛⲧ’ⲧⲉⲗⲓⲟⲥ ⲛⲉⲟⲩⲁ̣[ <text:line-break/><text:span text:style-name="T1"> </text:span><text:span text:style-name="T2">(76/16) </text:span> ⲛ ⲧⲉⲗⲓⲟⲥ ⲁⲩⲱ ⲙ ⲙⲁⲕ̣[ⲁⲣⲓⲟⲥ] <text:line-break/><text:span text:style-name="T1"> </text:span><text:span text:style-name="T2">(76/17) </text:span> ⲉⲥⲣ ϩⲁⲉ ⲙ ⲡⲁⲓ̈ ⲛⲧⲉ ⲡⲏ̣ [ⲉ]‐ <text:line-break/><text:span text:style-name="T1"> </text:span><text:span text:style-name="T2">(76/18) </text:span> ⲧⲙⲙⲁⲩ ϫⲉ ⲛⲁⲥⲣ ϩⲁⲉ̣[ <text:line-break/><text:span text:style-name="T1"> </text:span><text:span text:style-name="T2">(76/19) </text:span> ⲛⲧⲁϥ ϫⲉ ⲛⲉϥⲟⲩⲏϩ ⲛⲥ̣[ⲱⲥ] <text:line-break/><text:span text:style-name="T1"> </text:span><text:span text:style-name="T2">(76/20) </text:span> ⲡⲉ ⲙⲛ ⲟⲩⲥⲟⲟⲩⲛ· ⲁ[ⲩ]ⲱ̣ <text:line-break/><text:span text:style-name="T1"> </text:span><text:span text:style-name="T2">(76/21) </text:span> ⲟⲩⲅⲛⲱⲥⲓⲥ ⲛⲧⲁϥ ⲉ[ϥ]ϣⲟ‐ <text:line-break/><text:span text:style-name="T1"> </text:span><text:span text:style-name="T2">(76/22) </text:span> ⲟⲡ’ ⲛⲥⲁⲃⲟⲗ ⲙⲙⲟϥ· ⲙ̣ⲛ <text:line-break/><text:span text:style-name="T1"> </text:span><text:span text:style-name="T2">(76/23) </text:span> ⲡⲏ ⲉⲧ’ⲙⲟⲩϣⲧ’ ⲙⲙ[ⲟ]ϥ <text:line-break/><text:span text:style-name="T1"> </text:span><text:span text:style-name="T2">(76/24) </text:span> ⲉϥϣⲟⲟⲡ’ ⲛϩⲏⲧϥ· ⲟ̣[ⲩ]‐ <text:line-break/><text:span text:style-name="T1"> </text:span><text:span text:style-name="T2">(76/25) </text:span> ⲉⲓⲇⲱⲗⲟⲛ ⲙⲛ ⲟⲩϩⲓ[ <text:line-break/><text:span text:style-name="T1"> </text:span><text:span text:style-name="T2">(77/1) </text:span> [..]ⲣ ϩⲁⲉ ⲙ̣[......... <text:line-break/><text:span text:style-name="T1"> </text:span><text:span text:style-name="T2">(77/2) </text:span> [...]ⲙⲁⲩ [........]ⲉ̣[.. <text:line-break/><text:span text:style-name="T1"> </text:span><text:span text:style-name="T2">(77/3) </text:span> [...]ⲙⲁⲩ [......ϩⲁ]ⲡ[ⲗⲟ]ⲩ̅ <text:line-break/><text:span text:style-name="T1"> </text:span><text:span text:style-name="T2">(77/4) </text:span> [...]ⲡⲉⲉ̣[.....]ⲉϥⲡ̣[.. <text:line-break/><text:span text:style-name="T1"> </text:span><text:span text:style-name="T2">(77/5) </text:span> [...]ⲥⲟ[......]ⲛ̣ⲁⲩ· ⲁ[ⲩ]ⲱ̣ <text:line-break/><text:span text:style-name="T1"> </text:span><text:span text:style-name="T2">(77/6) </text:span> [..].ⲉⲉ[...]ⲉ̣ⲛ[.]ϥⲛⲁϩ[.]ⲉ̣ <text:line-break/><text:span text:style-name="T1"> </text:span><text:span text:style-name="T2">(77/7) </text:span> [...]ⲧ’ⲁ̣[...]. ⲡⲁⲓ̈ ⲁⲥϣⲱ̣[.]ⲡ̣ <text:line-break/><text:span text:style-name="T1"> </text:span><text:span text:style-name="T2">(77/8) </text:span> [.....]ⲗ ⲙ ⲡⲓⲡⲗⲏⲣⲱⲙⲁ <text:line-break/><text:span text:style-name="T1"> </text:span><text:span text:style-name="T2">(77/9) </text:span> [...]. ⲉⲧⲁⲥⲟⲩⲁϣϥ ϩⲱ‐ <text:line-break/><text:span text:style-name="T1"> </text:span><text:span text:style-name="T2">(77/10) </text:span> [ⲱⲥ ⲛ]ⲁ̣ⲥ ⲁⲛ· ⲡⲁⲓ̈ ⲛⲧⲁⲥ‐ <text:line-break/><text:span text:style-name="T1"> </text:span><text:span text:style-name="T2">(77/11) </text:span> [...]ⲁⲁϥ ⲛⲥⲁⲃⲟⲗ ⲛ ϯⲙⲛⲧ’‐ <text:line-break/><text:span text:style-name="T1"> </text:span><text:span text:style-name="T2">(77/12) </text:span> [ⲧⲉⲗⲓ]ⲟ̣ⲥ· ⲁⲥⲡⲱⲣϫ ⲉⲃⲟⲗ <text:line-break/><text:span text:style-name="T1"> </text:span><text:span text:style-name="T2">(77/13) </text:span> [ⲧⲙⲛⲧ]ⲡⲁⲛⲧⲉⲗⲓⲟⲥ ⲅⲁⲣ ⲧⲉ <text:line-break/><text:span text:style-name="T1"> </text:span><text:span text:style-name="T2">(77/14) </text:span> [ⲛⲧ]ⲉ ⲟⲩⲙⲛⲧ’ⲧⲉⲗⲓⲟⲥ ⲉⲥ‐ <text:line-break/><text:span text:style-name="T1"> </text:span><text:span text:style-name="T2">(77/15) </text:span> ϣⲟⲟⲡ’ ⲛ ⲟⲩⲙⲟⲩϣⲧ’· <text:line-break/><text:span text:style-name="T1"> </text:span><text:span text:style-name="T2">(77/16) </text:span> [ⲁ]ⲩ̣ⲱ ⲡⲣⲟⲥ ⲡⲏ ⲉⲧⲙⲙⲁⲩ <text:line-break/><text:span text:style-name="T1"> </text:span><text:span text:style-name="T2">(77/17) </text:span> [ⲧⲏ] ⲟⲩϫⲡⲟ ⲧⲉ ⲉⲥⲟⲩⲏϩ ⲛ‐ <text:line-break/><text:span text:style-name="T1"> </text:span><text:span text:style-name="T2">(77/18) </text:span> ⲥⲱϥ· ⲁⲩⲱ ϯⲉⲃⲟⲗ ϩⲛ ϯ‐ <text:line-break/><text:span text:style-name="T1"> </text:span><text:span text:style-name="T2">(77/19) </text:span> [ϭ]ⲟ̣ⲙ ⲛⲛ ⲁⲧ’ϣⲁϫⲉ ⲙⲙⲟⲥ <text:line-break/><text:span text:style-name="T1"> </text:span><text:span text:style-name="T2">(77/20) </text:span> [ⲛ]ⲧⲁϥ· ⲉⲥⲛⲧⲁⲥ ⲙⲙⲁⲩ <text:line-break/><text:span text:style-name="T1"> </text:span><text:span text:style-name="T2">(77/21) </text:span> ⲛ̣ ⲟⲩϣⲟⲣⲡ’ ⲛ ϭⲟⲙ· ⲙⲛ <text:line-break/><text:span text:style-name="T1"> </text:span><text:span text:style-name="T2">(77/22) </text:span> ϯϣⲟⲣⲡ’ ⲙ ⲙⲛⲧ’ⲁⲧⲙⲓⲥⲉ <text:line-break/><text:span text:style-name="T1"> </text:span><text:span text:style-name="T2">(77/23) </text:span> ⲉ̣ⲧ’ⲙⲛⲛⲥⲁ ⲡⲏ ⲉⲧⲙⲙⲁⲩ <text:line-break/><text:span text:style-name="T1"> </text:span><text:span text:style-name="T2">(77/24) </text:span> ϫⲉ ⲡⲣⲟⲥ ⲛⲓⲕⲉϣⲱϫⲡ’ <text:line-break/><text:span text:style-name="T1"> </text:span><text:span text:style-name="T2">(77/25) </text:span> ⲧⲏⲣⲟⲩ ⲟⲩϣⲟⲣⲡ’ ⲛⲛ ⲉⲱⲛ <text:line-break/><text:span text:style-name="T1"> </text:span><text:span text:style-name="T2">(78/1) </text:span> [ ]ⲡⲉ ⲛ [.. <text:line-break/><text:span text:style-name="T1"> </text:span><text:span text:style-name="T2">(78/2) </text:span> [...].[......]ⲁⲧ’ [.. <text:line-break/><text:soft-page-break/><text:span text:style-name="T1"> </text:span><text:span text:style-name="T2">(78/3) </text:span> ⲛ [..]ⲡ[........]ⲧⲧⲟ[.. <text:line-break/><text:span text:style-name="T1"> </text:span><text:span text:style-name="T2">(78/4) </text:span> [ⲧⲏ]ⲣⲟⲩ [......]ⲩⲡⲁ[.. <text:line-break/><text:span text:style-name="T1"> </text:span><text:span text:style-name="T2">(78/5) </text:span> ⲛ[ⲛ] ⲁⲧⲟⲩ[........]ϯ[.. <text:line-break/><text:span text:style-name="T1"> </text:span><text:span text:style-name="T2">(78/6) </text:span> ⲧ[.] ⲛ̣ⲧⲉ ⲡ[.]ⲉ[....].ϥⲉ̣[.. <text:line-break/><text:span text:style-name="T1"> </text:span><text:span text:style-name="T2">(78/7) </text:span> ⲙ[..]ⲉ ⲛⲙ ⲡⲏ .[...... <text:line-break/><text:span text:style-name="T1"> </text:span><text:span text:style-name="T2">(78/8) </text:span> ⲛ [ⲉ]ⲓ̣ⲙⲉ ⲉⲣⲟϥ ⲉϥϣⲟⲟ̣[ⲡ ⲟⲛ]‐ <text:line-break/><text:span text:style-name="T1"> </text:span><text:span text:style-name="T2">(78/9) </text:span> ⲧⲱⲥ ⲉⲩⲉⲱⲛ ⲡⲉ ⲛ ϥ[... <text:line-break/><text:span text:style-name="T1"> </text:span><text:span text:style-name="T2">(78/10) </text:span> ϩⲛ ⲟⲩⲉⲛⲉⲣⲅⲓⲁ ⲇⲉ [.. <text:line-break/><text:span text:style-name="T1"> </text:span><text:span text:style-name="T2">(78/11) </text:span> ϭⲟⲙ ⲁⲩⲱ ⲟⲩϩⲩ.[. <text:line-break/><text:span text:style-name="T1"> </text:span><text:span text:style-name="T2">(78/12) </text:span> ⲛⲛⲁⲥⲣ ⲁⲣⲭⲓ ⲉⲛ ⲛ̣ [.. <text:line-break/><text:span text:style-name="T1"> </text:span><text:span text:style-name="T2">(78/13) </text:span> ⲭⲣⲟⲛⲟⲥ· ⲁⲗⲗⲁ ⲁ̣ⲥ̣ [ⲟⲩⲱ]‐ <text:line-break/><text:span text:style-name="T1"> </text:span><text:span text:style-name="T2">(78/14) </text:span> ⲛϩ ⲉⲃⲟⲗ ϩⲛ ⲟⲩⲙⲛⲧ’ϣⲁ [ⲉ]‐ <text:line-break/><text:span text:style-name="T1"> </text:span><text:span text:style-name="T2">(78/15) </text:span> ⲛⲉϩ· ⲉⲁⲥⲁϩⲉⲣⲁⲧⲥ ⲛⲛ[ⲁ]‐ <text:line-break/><text:span text:style-name="T1"> </text:span><text:span text:style-name="T2">(78/16) </text:span> ϩⲣⲁϥ ϩⲛ ⲟⲩⲙⲛⲧ’ϣⲁ ⲉⲛ̣[ⲉϩ] <text:line-break/><text:span text:style-name="T1"> </text:span><text:span text:style-name="T2">(78/17) </text:span> ⲁⲩⲱ ⲁⲥⲣ ⲉⲃⲏ ⲉⲃⲟⲗ ϩⲓⲧⲛ ϯ‐ <text:line-break/><text:span text:style-name="T1"> </text:span><text:span text:style-name="T2">(78/18) </text:span> ⲙⲛⲧⲛⲟϭ ⲛⲧⲉ ϯⲙⲛⲧ’[.. <text:line-break/><text:span text:style-name="T1"> </text:span><text:span text:style-name="T2">(78/19) </text:span> ⲛⲧⲁϥ· ⲁⲥⲁϩⲉⲣⲁⲧⲥ ⲉ[ⲥ]‐ <text:line-break/><text:span text:style-name="T1"> </text:span><text:span text:style-name="T2">(78/20) </text:span> ⲛⲁⲩ ⲉⲣⲟϥ ⲁⲩⲱ ⲉⲥⲧ[ⲉ]ⲗ̣ⲏ[ⲗ] <text:line-break/><text:span text:style-name="T1"> </text:span><text:span text:style-name="T2">(78/21) </text:span> ⲙⲙⲟⲥ ⲉⲥⲙⲉϩ ⲉⲃⲟⲗ ϩⲛ ⲟ̣[ⲩ]‐ <text:line-break/><text:span text:style-name="T1"> </text:span><text:span text:style-name="T2">(78/22) </text:span> ⲙⲛⲧ’ⲭⲣⲏⲥⲧⲟⲥ ⲙⲙ[ⲟ]ⲥ [.. <text:line-break/><text:span text:style-name="T1"> </text:span><text:span text:style-name="T2">(78/23) </text:span> ⲣϫ ⲉⲃⲟⲗ· ⲁⲗⲗⲁ ⲛⲧⲁⲥⲙⲟ[ <text:line-break/><text:span text:style-name="T1"> </text:span><text:span text:style-name="T2">(79/1) </text:span> [...]ⲛⲟ̣[ <text:line-break/><text:span text:style-name="T1"> </text:span><text:span text:style-name="T2">(79/2) </text:span> [...]ⲧ’ .[.......].[... <text:line-break/><text:span text:style-name="T1"> </text:span><text:span text:style-name="T2">(79/3) </text:span> [...].[.......]ⲛⲧ[.. <text:line-break/><text:span text:style-name="T1"> </text:span><text:span text:style-name="T2">(79/4) </text:span> [....].[.....]ⲧ̣ⲉⲛⲓ̣[..]ⲩ <text:line-break/><text:span text:style-name="T1"> </text:span><text:span text:style-name="T2">(79/5) </text:span> [.........]ⲥ ⲛ ⲛⲁ.[.]ⲩ <text:line-break/><text:span text:style-name="T1"> </text:span><text:span text:style-name="T2">(79/6) </text:span> [.........]ⲉ ⲉⲥϣ[..]ⲡ’ <text:line-break/><text:span text:style-name="T1"> </text:span><text:span text:style-name="T2">(79/7) </text:span> [.......]ϣⲟⲣⲡ’ ⲛ ϩⲩ̣ⲡ̣ⲁⲣ‐ <text:line-break/><text:span text:style-name="T1"> </text:span><text:span text:style-name="T2">(79/8) </text:span> [ⲝⲓⲥ...] ⲁⲧⲟⲩⲥⲓⲁ· ⲙⲛ ⲛ‐ <text:line-break/><text:span text:style-name="T1"> </text:span><text:span text:style-name="T2">(79/9) </text:span> [..]. ⲉⲧⲙ̣ⲙⲁⲩ· ⲉⲃⲟⲗ <text:line-break/><text:span text:style-name="T1"> </text:span><text:span text:style-name="T2">(79/10) </text:span> [ϩ]ⲙ̣ ⲡⲓⲁⲧ’ⲡⲱⲣϫ ⲡⲣⲟⲥ <text:line-break/><text:span text:style-name="T1"> </text:span><text:span text:style-name="T2">(79/11) </text:span> [ϯϩ]ⲩⲡⲁⲣⲝⲓⲥ ϩⲛ ⲟⲩⲉⲛⲉⲣ‐ <text:line-break/><text:span text:style-name="T1"> </text:span><text:span text:style-name="T2">(79/12) </text:span> [ⲅⲓⲁ ⲙⲛ] ϯⲙⲛⲧ’ⲧⲉⲗⲓⲟⲥ ⲛ ⲛⲟ‐ <text:line-break/><text:span text:style-name="T1"> </text:span><text:span text:style-name="T2">(79/13) </text:span> [ⲉⲣⲟⲛ] ⲙⲛ ⲡⲓⲱⲛϩ ⲛ ⲛⲟⲉⲣⲟⲛ <text:line-break/><text:span text:style-name="T1"> </text:span><text:span text:style-name="T2">(79/14) </text:span> [ⲉϥ]ⲕⲓⲙ ⲉⲧⲉ ⲛⲉⲟⲩⲙⲛⲧ’‐ <text:line-break/><text:span text:style-name="T1"> </text:span><text:span text:style-name="T2">(79/15) </text:span> [ⲙⲁ]ⲕⲁⲣⲓⲟⲥ ⲡⲉ ⲙⲛ ⲟⲩⲙⲛ‐ <text:line-break/><text:span text:style-name="T1"> </text:span><text:span text:style-name="T2">(79/16) </text:span> [ⲧⲛ]ⲟ̣ⲩⲧⲉ· ⲁⲩⲱ ⲡⲓⲡ̅ⲛ̅ⲁ̅ <text:line-break/><text:span text:style-name="T1"> </text:span><text:span text:style-name="T2">(79/17) </text:span> [ⲧⲏ]ⲣϥ ⲛ ⲧⲉⲗⲓⲟⲥ ⲛ ϩⲁⲡⲗⲟ̅ⲩ̅ <text:line-break/><text:span text:style-name="T1"> </text:span><text:span text:style-name="T2">(79/18) </text:span> [ⲁ]ⲩⲱ ⲛⲛ ⲁⲧⲛⲁⲩ ⲉⲣⲟϥ <text:line-break/><text:span text:style-name="T1"> </text:span><text:span text:style-name="T2">(79/19) </text:span> [ⲉⲁ]ϥϣⲱⲡⲉ ⲛ ⲟⲩⲙⲛⲧ’ⲟⲩ‐ <text:line-break/><text:span text:style-name="T1"> </text:span><text:span text:style-name="T2">(79/20) </text:span> ⲱ̣ⲧ’ ϩⲛ ⲟⲩϩⲩⲡⲁⲣⲝⲓⲥ ⲙⲛ <text:line-break/><text:span text:style-name="T1"> </text:span><text:span text:style-name="T2">(79/21) </text:span> [ⲟⲩ]ⲉⲛⲉⲣⲅⲓⲁ ⲙⲛ ⲟⲩϣⲙⲧ’‐ <text:line-break/><text:span text:style-name="T1"> </text:span><text:span text:style-name="T2">(79/22) </text:span> [ϭⲟⲙ] ⲛ ϩⲁⲡⲗⲟⲩⲛ· ⲟⲩ‐ <text:line-break/><text:span text:style-name="T1"> </text:span><text:span text:style-name="T2">(79/23) </text:span> [ⲡ̅ⲛ̅ⲁ̅] ⲛ̣ⲛ ⲁⲧⲛⲁⲩ ⲉⲣⲟϥ ⲟⲩ‐ <text:line-break/><text:span text:style-name="T1"> </text:span><text:span text:style-name="T2">(79/24) </text:span> [ϩⲓ]ⲕ̣ⲱⲛ ⲛⲧⲉ ⲡⲏ ⲉⲧ’‐ <text:line-break/><text:span text:style-name="T1"> </text:span><text:span text:style-name="T2">(79/25) </text:span> [ϣ]ⲟⲟⲡ’ ⲟⲛⲧⲱⲥ ⲡⲓⲟⲩⲁ <text:line-break/><text:span text:style-name="T1"> </text:span><text:span text:style-name="T2">(80/1) </text:span> [ ].[ <text:line-break/><text:soft-page-break/><text:span text:style-name="T1"> </text:span><text:span text:style-name="T2">(80/2) </text:span> .[..].[.......].ⲁϥ̣[ <text:line-break/><text:span text:style-name="T1"> </text:span><text:span text:style-name="T2">(80/3) </text:span> ⲝ̣[.].ϭⲙ̣[.......]..[ <text:line-break/><text:span text:style-name="T1"> </text:span><text:span text:style-name="T2">(80/4) </text:span> .[..]...[ <text:line-break/><text:span text:style-name="T1"> </text:span><text:span text:style-name="T2">(80/5) </text:span> .[.] ⲙⲙⲛ[ <text:line-break/><text:span text:style-name="T1"> </text:span><text:span text:style-name="T2">(80/6) </text:span> ⲙ ⲡ̣ⲓⲟⲛ[ⲧ]ⲱ̣ⲥ̣ [ⲉⲧϣⲟⲟⲡ’ <text:line-break/><text:span text:style-name="T1"> </text:span><text:span text:style-name="T2">(80/7) </text:span> ⲉ[ϥ]ϣⲟⲟ̣ⲡ’̣ ϩⲛ ⲟ[ⲩ <text:line-break/><text:span text:style-name="T1"> </text:span><text:span text:style-name="T2">(80/8) </text:span> ⲧⲉ ⲧⲁⲓ̈ ⲉⲩϩⲓⲕⲱⲛ ⲧⲉ .[ <text:line-break/><text:span text:style-name="T1"> </text:span><text:span text:style-name="T2">(80/9) </text:span> ⲡⲉ ϩⲛ ⲟⲩⲕⲱⲧ̣ⲉ ⲙ[ <text:line-break/><text:span text:style-name="T1"> </text:span><text:span text:style-name="T2">(80/10) </text:span> ϭⲟⲙ ⲉ ϩⲱⲧⲡ’ ⲙⲛ ⲡⲉϥ .[ <text:line-break/><text:span text:style-name="T1"> </text:span><text:span text:style-name="T2">(80/11) </text:span> ⲉⲁⲥⲛⲁⲩ ⲉ ⲡⲓϣⲱⲱ̣[ <text:line-break/><text:span text:style-name="T1"> </text:span><text:span text:style-name="T2">(80/12) </text:span> ⲡⲏ ⲉⲛⲉϥϣⲟⲟⲡ’ ⲛⲁ[ <text:line-break/><text:span text:style-name="T1"> </text:span><text:span text:style-name="T2">(80/13) </text:span> ϯⲙⲛⲧ’ⲡⲁⲛⲧⲉⲗⲓⲟⲥ ⲛ [ <text:line-break/><text:span text:style-name="T1"> </text:span><text:span text:style-name="T2">(80/14) </text:span> ⲉⲧⲙⲙⲁⲩ· ϫⲉ ⲡⲏ ⲙⲉ̣[ <text:line-break/><text:span text:style-name="T1"> </text:span><text:span text:style-name="T2">(80/15) </text:span> ϣⲟⲣⲡ’ ⲛ ϣⲟⲟⲡ’ ⲁⲩⲱ̣ [ <text:line-break/><text:span text:style-name="T1"> </text:span><text:span text:style-name="T2">(80/16) </text:span> ⲕⲏ ϩⲓϫⲛ ⲛⲁⲓ̈ ⲧⲏⲣⲟⲩ ⲉ̣ϥ̣[ <text:line-break/><text:span text:style-name="T1"> </text:span><text:span text:style-name="T2">(80/17) </text:span> ϣⲟⲣⲡ’ ⲛ ϣⲟⲟⲡ’ ⲉⲩⲉⲓⲙ[ⲉ] <text:line-break/><text:span text:style-name="T1"> </text:span><text:span text:style-name="T2">(80/18) </text:span> ⲉⲣⲟϥ ⲛ ϣⲙⲧϭⲟⲙ· ⲡ̣ⲓ̣[ⲁ]‐ <text:line-break/><text:span text:style-name="T1"> </text:span><text:span text:style-name="T2">(80/19) </text:span> ϩⲟⲣⲁⲧⲟⲛ ⲙ ⲡ̅ⲛ̅ⲁ̅ ⲉⲙⲡϥ[ⲣ] <text:line-break/><text:span text:style-name="T1"> </text:span><text:span text:style-name="T2">(80/20) </text:span> ⲁⲧ’ⲉⲓⲙⲉ ⲣⲱ ⲉⲛⲉϩ· [ⲛⲉϥ]‐ <text:line-break/><text:span text:style-name="T1"> </text:span><text:span text:style-name="T2">(80/21) </text:span> ⲉⲓⲙⲉ ⲁⲗⲗⲁ ⲛⲉϥϣⲟ̣[ⲟⲡ’ ⲛ] <text:line-break/><text:span text:style-name="T1"> </text:span><text:span text:style-name="T2">(80/22) </text:span> ⲟⲩⲙⲛⲧ’ⲧⲉⲗⲓⲟⲥ̣ [ⲙⲛ ⲟⲩ]‐ <text:line-break/><text:span text:style-name="T1"> </text:span><text:span text:style-name="T2">(80/23) </text:span> ⲙⲛⲧ’ⲙⲁ[ⲕ]ⲁⲣⲓⲟⲥ·ʹ264 ⲧ[ <text:line-break/><text:span text:style-name="T1"> </text:span><text:span text:style-name="T2">(81/1) </text:span> [ⲛ]ⲧⲁⲥⲣ ⲁⲧ’ⲉⲓⲙⲉ [ <text:line-break/><text:span text:style-name="T1"> </text:span><text:span text:style-name="T2">(81/2) </text:span> ⲁⲩⲱ ⲉⲥϣ̣[ ]. <text:line-break/><text:span text:style-name="T1"> </text:span><text:span text:style-name="T2">(81/3) </text:span> ⲥ̣ⲱⲙⲁ ⲙⲛ ⲛ̣[ <text:line-break/><text:span text:style-name="T1"> </text:span><text:span text:style-name="T2">(81/4) </text:span> .ⲉⲣⲏⲧ ⲉ.[ <text:line-break/><text:span text:style-name="T1"> </text:span><text:span text:style-name="T2">(81/5) </text:span> [.]ⲟⲩⲟⲉⲓ̣ⲛ̣ [ <text:line-break/><text:span text:style-name="T1"> </text:span><text:span text:style-name="T2">(81/6) </text:span> [..]ⲥϣⲟ[ⲟⲡ’] ⲉⲕ.[ <text:line-break/><text:span text:style-name="T1"> </text:span><text:span text:style-name="T2">(81/7) </text:span> [.]ⲩ̣ⲗⲟⲉⲓ.[..]ⲓⲧⲉ ⲡ[.]ⲓⲕⲉ· ϩ[ⲓ]ⲛ̣ⲁ <text:line-break/><text:span text:style-name="T1"> </text:span><text:span text:style-name="T2">(81/8) </text:span> ϫⲉ ⲛⲛⲉⲥⲉⲓ ⲉⲃⲟⲗ ⲛϩⲟⲩⲟ <text:line-break/><text:span text:style-name="T1"> </text:span><text:span text:style-name="T2">(81/9) </text:span> [ⲁ]ⲩⲱ ⲛⲥϣⲱⲡⲉ ϩⲓ ⲡⲟⲩⲉ <text:line-break/><text:span text:style-name="T1"> </text:span><text:span text:style-name="T2">(81/10) </text:span> ⲛ̣ⲧⲉ ϯⲙⲛⲧ’ⲧⲉⲗⲓⲟⲥ· ⲁⲥ‐ <text:line-break/><text:span text:style-name="T1"> </text:span><text:span text:style-name="T2">(81/11) </text:span> ⲙ̣ⲙⲉ ⲉⲣⲟⲥ ⲙⲛ ⲡⲏ ⲉⲧⲙ‐ <text:line-break/><text:span text:style-name="T1"> </text:span><text:span text:style-name="T2">(81/12) </text:span> ⲙ̣ⲁⲩ̣· ⲁⲩⲱ ⲁⲥⲁϩⲉⲣⲁⲧⲥ <text:line-break/><text:span text:style-name="T1"> </text:span><text:span text:style-name="T2">(81/13) </text:span> [ϩⲱ]ⲱⲥ ⲁⲥⲟⲩⲱϣⲥ ⲉⲃⲟⲗ <text:line-break/><text:span text:style-name="T1"> </text:span><text:span text:style-name="T2">(81/14) </text:span> [ⲉⲧ]ⲃⲉ ⲡⲏ ⲉⲧⲙⲙⲁⲩ· ⲁⲩⲱ <text:line-break/><text:span text:style-name="T1"> </text:span><text:span text:style-name="T2">(81/15) </text:span> [ⲉ]ⲡⲓⲇⲏ ⲛⲉⲥϣⲟⲟⲡ’ ⲉⲃⲟⲗ <text:line-break/><text:span text:style-name="T1"> </text:span><text:span text:style-name="T2">(81/16) </text:span> [ϩⲙ ⲡ]ⲏ ⲉⲧ’ϣⲟⲟⲡ’ ⲟⲛⲧⲱⲥ <text:line-break/><text:span text:style-name="T1"> </text:span><text:span text:style-name="T2">(81/17) </text:span> [ⲛ]ⲉⲥϣⲟⲟⲡ’ ⲉⲃⲟⲗ ϩⲙ ⲡⲏ ⲉⲧ’ <text:line-break/><text:span text:style-name="T1"> </text:span><text:span text:style-name="T2">(81/18) </text:span> ϣⲟⲟⲡ’ ⲟⲛⲧⲱⲥ ⲙⲛ ⲛⲏ <text:line-break/><text:span text:style-name="T1"> </text:span><text:span text:style-name="T2">(81/19) </text:span> [ⲧ]ⲏⲣⲟⲩ ⲉⲥⲟⲩⲱⲛⲥ ⲁⲩⲱ <text:line-break/><text:span text:style-name="T1"> </text:span><text:span text:style-name="T2">(81/20) </text:span> [ⲥ]ⲥⲟⲩⲛ ⲡⲏ ⲉⲧⲣ ϣⲣⲡ’ ⲛ ϣⲟ‐ <text:line-break/><text:span text:style-name="T1"> </text:span><text:span text:style-name="T2">(81/21) </text:span> [ⲟ]ⲡ’· ⲉⲁⲩⲟⲩⲁϩⲟⲩ ⲛⲥⲱϥ <text:line-break/><text:span text:style-name="T1"> </text:span><text:span text:style-name="T2">(81/22) </text:span> ⲁⲩϣ̣ⲱ̣ⲡⲉ ⲉⲩϣⲟⲟⲡ’ {ⲁⲩ‐ <text:line-break/><text:span text:style-name="T1"> </text:span><text:span text:style-name="T2">(81/23) </text:span> ϣⲱ[ⲡ]ⲉ ⲉⲩϣⲟⲟⲡ’} ⲁⲩⲱ <text:line-break/><text:span text:style-name="T1"> </text:span><text:span text:style-name="T2">(81/24) </text:span> ⲉⲩⲟⲩⲟⲛϩ ⲉⲃ[ⲟⲗ] ϩⲓⲧⲛ ⲛⲏ <text:line-break/><text:span text:style-name="T1"> </text:span><text:span text:style-name="T2">(82/1) </text:span> [ⲉⲧⲣ ϣⲟⲣ]ⲡ’̣ ⲛ̣ [ϣ]ⲟ̣ⲟⲡ’· ⲁⲩⲱ <text:line-break/><text:soft-page-break/><text:span text:style-name="T1"> </text:span><text:span text:style-name="T2">(82/2) </text:span> .[........ ⲉ]ⲃ̣ⲟⲗϩⲓⲧⲛ ⲛⲓ̣‐[ <text:line-break/><text:span text:style-name="T1"> </text:span><text:span text:style-name="T2">(82/3) </text:span> [ ] ⲉⲁⲩⲟⲩⲱⲛ[ϩ] <text:line-break/><text:span text:style-name="T1"> </text:span><text:span text:style-name="T2">(82/4) </text:span> [ⲉⲃⲟⲗ ] ⲥⲛⲧⲉ ⲙ [ <text:line-break/><text:span text:style-name="T1"> </text:span><text:span text:style-name="T2">(82/5) </text:span> [ ] ⲁ̣ⲩⲟⲩⲱ̣[ⲛϩ <text:line-break/><text:span text:style-name="T1"> </text:span><text:span text:style-name="T2">(82/6) </text:span> [ⲉⲃⲟⲗ ....].[. ⲡ]ⲏ ⲉⲧ‐ <text:line-break/><text:span text:style-name="T1"> </text:span><text:span text:style-name="T2">(82/7) </text:span> ⲣ ϣⲟⲣⲡ’̣ ⲛ ⲉⲓⲙⲉ̣ ⲉⲣⲟϥ ⲉⲩ‐ <text:line-break/><text:span text:style-name="T1"> </text:span><text:span text:style-name="T2">(82/8) </text:span> ⲭⲱⲣⲏⲙⲁ ⲡⲉ ⲛ ϣⲁ ⲉⲛⲉϩ· <text:line-break/><text:span text:style-name="T1"> </text:span><text:span text:style-name="T2">(82/9) </text:span> ⲉⲁϥϣⲱⲡⲉ ⲛ ⲟⲩⲙⲉ[ϩ]‐ <text:line-break/><text:span text:style-name="T1"> </text:span><text:span text:style-name="T2">(82/10) </text:span> ⲥⲛⲧⲉ ⲛⲧⲉ ⲧⲉϥⲅⲛⲱⲥⲓⲥ <text:line-break/><text:span text:style-name="T1"> </text:span><text:span text:style-name="T2">(82/11) </text:span> ⲡⲁⲗⲓⲛ ⲟⲛ ϯⲅⲛⲱⲥⲓⲥ ⲛⲧ̣[ⲉ] <text:line-break/><text:span text:style-name="T1"> </text:span><text:span text:style-name="T2">(82/12) </text:span> ⲧⲉϥⲅⲛⲱⲥⲓⲥ ⲉⲧⲉ ⲡⲓⲕ̅ⲗ̣̅̅[̅ⲥ̅] <text:line-break/><text:span text:style-name="T1"> </text:span><text:span text:style-name="T2">(82/13) </text:span> ⲡⲉ ⲛⲛ ⲁⲧⲙⲓⲥⲉ· ⲁⲩⲱ [ⲡⲓ̅] <text:line-break/><text:span text:style-name="T1"> </text:span><text:span text:style-name="T2">(82/14) </text:span> ⲟⲛⲧⲱⲥ ⲉⲧ[ϣⲟⲟⲡ’̣ ⲟ[ⲛ ⲁⲩ]‐ <text:line-break/><text:span text:style-name="T1"> </text:span><text:span text:style-name="T2">(82/15) </text:span> ⲁϩⲉⲣⲁⲧⲟⲩ ϩⲓϫⲙ ⲡⲁⲓ̈· [ⲉ]‐ <text:line-break/><text:span text:style-name="T1"> </text:span><text:span text:style-name="T2">(82/16) </text:span> ⲧⲃⲉ ⲡⲁⲓ̈ ⲅⲁⲣ ⲁⲥⲥⲟⲩ̣[ⲱⲛϥ] <text:line-break/><text:span text:style-name="T1"> </text:span><text:span text:style-name="T2">(82/17) </text:span> ϩⲓⲛⲁ ϫⲉ ⲉⲣⲉⲛⲏ ⲉⲧⲟⲩⲏ[ϩ] <text:line-break/><text:span text:style-name="T1"> </text:span><text:span text:style-name="T2">(82/18) </text:span> ⲛⲥⲱⲥ ϣⲱⲡⲉ ⲉⲩⲛⲧⲁ̣[ⲩ] <text:line-break/><text:span text:style-name="T1"> </text:span><text:span text:style-name="T2">(82/19) </text:span> ⲛ ⲟⲩⲧⲟⲡⲟⲥ ⲁⲩⲱ ⲛⲥⲉ̣‐ <text:line-break/><text:span text:style-name="T1"> </text:span><text:span text:style-name="T2">(82/20) </text:span> ϣⲧⲙⲣ ϣⲟⲣⲡ’ ⲉⲣⲟⲥ ⲛ[ϭⲓ] <text:line-break/><text:span text:style-name="T1"> </text:span><text:span text:style-name="T2">(82/21) </text:span> ⲛⲏ ⲉⲧⲛⲏⲩ ⲉⲃⲟⲗ [ⲁ]ⲗ̣ⲗⲁ̣ <text:line-break/><text:span text:style-name="T1"> </text:span><text:span text:style-name="T2">(82/22) </text:span> ⲛⲥⲉϣⲱⲡⲉ ⲉⲩ̣[ⲟ]ⲩⲁⲁⲃ <text:line-break/><text:span text:style-name="T1"> </text:span><text:span text:style-name="T2">(82/23) </text:span> ⲛ ϩⲁⲡⲗⲟⲩⲛ· ϯⲕ̣ⲁ̣ⲧⲁ‐ <text:line-break/><text:span text:style-name="T1"> </text:span><text:span text:style-name="T2">(82/24) </text:span> ⲛⲟⲏⲥⲓ̣[ⲥ ⲧ]ⲉ ⲛⲧⲉ ⲡⲛⲟ̣ⲩ‐ <text:line-break/><text:span text:style-name="T1"> </text:span><text:span text:style-name="T2">(83/1) </text:span> [ⲧ]ⲉ ⲉⲧⲣ ϣ̣ⲣ̣ⲡ’ ⲛ ϣ̣[ⲟⲟⲡ’· ⲁⲥ]‐ <text:line-break/><text:span text:style-name="T1"> </text:span><text:span text:style-name="T2">(83/2) </text:span> ⲟⲩⲱϣⲥ ⲉ[ⲃⲟⲗ <text:line-break/><text:span text:style-name="T1"> </text:span><text:span text:style-name="T2">(83/3) </text:span> ⲉ ⲡⲓϩⲁⲡⲗⲟⲩ̣[ⲛ <text:line-break/><text:span text:style-name="T1"> </text:span><text:span text:style-name="T2">(83/4) </text:span> ⲛ̣ ⲟⲩⲟⲩϫⲁⲓ̈ [ <text:line-break/><text:span text:style-name="T1"> </text:span><text:span text:style-name="T2">(83/5) </text:span> [.] ⲟ̣ⲩⲟⲩϫⲁⲓ̈ [ <text:line-break/><text:span text:style-name="T1"> </text:span><text:span text:style-name="T2">(83/6) </text:span> [..].. ⲡ̣ⲏ ⲙⲉ̣ⲛ̣ .[ <text:line-break/><text:span text:style-name="T1"> </text:span><text:span text:style-name="T2">(83/7) </text:span> [...ⲟ]ⲩⲟⲉⲓⲛ ⲉⲧ̣[ⲟ]ⲩⲣ ϣ[ⲣ]ⲡ’ <text:line-break/><text:span text:style-name="T1"> </text:span><text:span text:style-name="T2">(83/8) </text:span> [ⲛ ⲉⲓⲙ]ⲉ ⲉⲣⲟϥ ⲁⲩⲙ̣ⲟ̣ⲩⲧⲉ ⲉⲣⲟⲥ <text:line-break/><text:span text:style-name="T1"> </text:span><text:span text:style-name="T2">(83/9) </text:span> [ϫⲉ] ϯⲃⲁ̅ⲣ̅ⲃ̅ⲏ̣̅̅ⲗ̅ⲱ̅ ⲉⲃⲟⲗ ϩⲓⲧⲛ <text:line-break/><text:span text:style-name="T1"> </text:span><text:span text:style-name="T2">(83/10) </text:span> [ϯ]ⲉⲛⲛⲟⲓⲁ· ϯϣⲙⲧ’ⲅⲉ‐ <text:line-break/><text:span text:style-name="T1"> </text:span><text:span text:style-name="T2">(83/11) </text:span> [ⲛⲟⲥ] ⲛ ϩⲟⲟⲩⲧ’ ⲙ ⲡⲁⲣⲑⲉⲛⲟⲥ <text:line-break/><text:span text:style-name="T1"> </text:span><text:span text:style-name="T2">(83/12) </text:span> [ⲛ ⲧ]ⲉ̣ⲗⲓⲟⲥ· ϯⲅⲛⲱⲥⲓⲥ ⲇⲉ <text:line-break/><text:span text:style-name="T1"> </text:span><text:span text:style-name="T2">(83/13) </text:span> [ⲛⲧⲉ] ⲧⲁⲓ̈ ⲧⲏ ⲉⲧⲁⲥϣⲱⲡⲉ <text:line-break/><text:span text:style-name="T1"> </text:span><text:span text:style-name="T2">(83/14) </text:span> [ⲉⲃⲟ]ⲗ̣ ϩⲓⲧⲟⲟⲧⲥ ϫⲉ ⲛⲛⲟⲩ‐ <text:line-break/><text:span text:style-name="T1"> </text:span><text:span text:style-name="T2">(83/15) </text:span> [.]ⲟ̣ⲕⲥ ⲉ ⲡⲉⲥⲏⲧ’· ⲁⲩⲱ ϫⲉ <text:line-break/><text:span text:style-name="T1"> </text:span><text:span text:style-name="T2">(83/16) </text:span> [ⲛ]ⲛⲉⲥⲉⲓ ⲉⲃⲟⲗ ⲛϩⲟⲩⲟ ⲉ‐ <text:line-break/><text:span text:style-name="T1"> </text:span><text:span text:style-name="T2">(83/17) </text:span> ⲃⲟⲗ ϩⲓⲧⲛ ⲛⲏ ⲉⲧ’ϣⲟⲟⲡ’ <text:line-break/><text:span text:style-name="T1"> </text:span><text:span text:style-name="T2">(83/18) </text:span> [ⲛ]ϩⲏⲧⲥ ⲙⲛ ⲛⲏ ⲉⲧⲟⲩⲏϩ <text:line-break/><text:span text:style-name="T1"> </text:span><text:span text:style-name="T2">(83/19) </text:span> ⲛⲥⲱⲥ· ⲁⲗⲗⲁ ⲉⲥϣⲟⲟⲡ’ <text:line-break/><text:span text:style-name="T1"> </text:span><text:span text:style-name="T2">(83/20) </text:span> ⲛ ϩⲁⲡⲗⲟⲩⲛ ϫⲉ ⲉⲥⲉϭⲙ <text:line-break/><text:span text:style-name="T1"> </text:span><text:span text:style-name="T2">(83/21) </text:span> [ϭ]ⲟⲙ ⲉ ⲥⲟⲩⲱⲛ ⲡⲛⲟⲩⲧⲉ <text:line-break/><text:span text:style-name="T1"> </text:span><text:span text:style-name="T2">(83/22) </text:span> ⲉⲧ̣[ⲣ] ϣⲣⲡ’ ⲛ ϣⲟⲟⲡ’ ϫⲉ <text:line-break/><text:span text:style-name="T1"> </text:span><text:span text:style-name="T2">(83/23) </text:span> ⲁⲥ[ϣ]ⲱⲡⲉ ⲉⲛⲁⲛⲟⲩⲥ ⲛ‐ <text:line-break/><text:span text:style-name="T1"> </text:span><text:span text:style-name="T2">(83/24) </text:span> ⲧⲉ ⲡⲏ ⲉⲧⲙⲙ[ⲁ]ⲩ ⲉⲁⲥⲟⲩ‐ <text:line-break/><text:soft-page-break/><text:span text:style-name="T1"> </text:span><text:span text:style-name="T2">(83/25) </text:span> [.......]..[...] ⲉⲃⲟⲗ ⲛ <text:line-break/><text:span text:style-name="T1"> </text:span><text:span text:style-name="T2">(84/1) </text:span> [.....ⲟ]ⲩ̣ⲙⲛⲧⲁⲧ’ⲙⲓⲥ[ⲉ] <text:line-break/><text:span text:style-name="T1"> </text:span><text:span text:style-name="T2">(84/2) </text:span> [ ⲙ]ⲉϩϣⲟⲙⲧ’ <text:line-break/><text:span text:style-name="T1"> </text:span><text:span text:style-name="T2">(84/3) </text:span> .[........]. ⲥⲛⲁⲩ ⲛ̣ ⲇⲓⲁ‐ <text:line-break/><text:span text:style-name="T1"> </text:span><text:span text:style-name="T2">(84/4) </text:span> [........]ⲧ’ ⲛ ⲧⲉ̣[ⲓ̈]ϩⲉ .[ <text:line-break/><text:span text:style-name="T1"> </text:span><text:span text:style-name="T2">(84/5) </text:span> .[.....ϩⲟ]ⲟ̣ⲩⲧ’ ⲇⲉ̣ ..[ <text:line-break/><text:span text:style-name="T1"> </text:span><text:span text:style-name="T2">(84/6) </text:span> ⲣ̣ [.......].ⲉⲛ[ <text:line-break/><text:span text:style-name="T1"> </text:span><text:span text:style-name="T2">(84/7) </text:span> ⲣ[..] ⲛ ⲛⲉ̣[..]ⲛ ⲙⲛ ϯⲙ̣[ <text:line-break/><text:span text:style-name="T1"> </text:span><text:span text:style-name="T2">(84/8) </text:span> ⲧⲉ ⲙ ⲙ[ⲛ]ⲧ’ⲁ̣ⲧ’ⲙⲓⲥ[ⲉ <text:line-break/><text:span text:style-name="T1"> </text:span><text:span text:style-name="T2">(84/9) </text:span> ⲥⲓⲥ ⲧⲉ ⲟⲩⲙ̣ⲉϩ̣ⲥⲛⲧⲉ ⲛ[ <text:line-break/><text:span text:style-name="T1"> </text:span><text:span text:style-name="T2">(84/10) </text:span> ⲕⲱⲛ̣ .ⲁⲥⲁϩⲉⲣⲁⲧⲥ [ <text:line-break/><text:span text:style-name="T1"> </text:span><text:span text:style-name="T2">(84/11) </text:span> ϣⲟⲣⲡ’ ⲛⲧⲉ ⲡⲓⲟⲛⲧⲱ[ⲥ ⲉⲧ]‐ <text:line-break/><text:span text:style-name="T1"> </text:span><text:span text:style-name="T2">(84/12) </text:span> ϣⲟⲟⲡ’ ⲟⲛⲧⲱⲥ ⲛ ⲕ[ <text:line-break/><text:span text:style-name="T1"> </text:span><text:span text:style-name="T2">(84/13) </text:span> ⲧⲉ ϯⲙⲛⲧ’ⲙⲁⲕⲁⲣⲓⲟ[ⲥ <text:line-break/><text:span text:style-name="T1"> </text:span><text:span text:style-name="T2">(84/14) </text:span> ⲛⲧⲉ ⲡⲓⲁϩⲟⲣⲁⲧⲟⲛ ⲙ ⲡ̅[̅ⲛ̅ⲁ̅ <text:line-break/><text:span text:style-name="T1"> </text:span><text:span text:style-name="T2">(84/15) </text:span> ϯⲅⲛⲱⲥⲓⲥ ⲛⲧⲉ ϯϣⲟⲣ[ⲡ’] <text:line-break/><text:span text:style-name="T1"> </text:span><text:span text:style-name="T2">(84/16) </text:span> ⲛ ϩⲩⲡⲁⲣⲝⲓⲥ ⲛϩⲣⲁⲓ̈ ϩⲛ ϯ‐ <text:line-break/><text:span text:style-name="T1"> </text:span><text:span text:style-name="T2">(84/17) </text:span> ⲙⲛⲧ’ϩⲁⲡⲗⲟⲩⲥ ⲛⲧⲉ ⲡⲓ[ⲁ]‐ <text:line-break/><text:span text:style-name="T1"> </text:span><text:span text:style-name="T2">(84/18) </text:span> ⲧⲛⲁⲩ ⲉⲣⲟϥ ⲙ ⲡ̅ⲛ̅ⲁ̅ ⲛ ϩⲣⲁⲓ̣̈ <text:line-break/><text:span text:style-name="T1"> </text:span><text:span text:style-name="T2">(84/19) </text:span> ϩⲛ ϯϩⲉⲛⲛⲁⲥ̣ ⲉϥⲉⲓⲛⲉ ⲛ‐ <text:line-break/><text:span text:style-name="T1"> </text:span><text:span text:style-name="T2">(84/20) </text:span> ϩⲣⲁⲓ̈ ϩⲛ ϯⲙⲛⲧ’ⲟⲩⲱⲧ’̣ ⲧ[ⲏ] <text:line-break/><text:span text:style-name="T1"> </text:span><text:span text:style-name="T2">(84/21) </text:span> ⲉⲧ’ⲧⲟⲩⲃⲏⲩ ⲁⲩⲱ̣ [.]ⲁ[ <text:line-break/><text:span text:style-name="T1"> </text:span><text:span text:style-name="T2">(84/22) </text:span> ⲉⲓⲇⲟⲥ· [ⲁ]ⲩⲱ ϥϣ̣[ⲟ]ⲟ̣ⲡ’̣ <text:line-break/><text:span text:style-name="T1"> </text:span><text:span text:style-name="T2">(84/23) </text:span> ⲛϭⲓ ⲡⲏ ⲉⲧ̣[ <text:line-break/><text:span text:style-name="T1"> </text:span><text:span text:style-name="T2">(85/1) </text:span> [ <text:line-break/><text:span text:style-name="T1"> </text:span><text:span text:style-name="T2">(85/2) </text:span> [ <text:line-break/><text:span text:style-name="T1"> </text:span><text:span text:style-name="T2">(85/3) </text:span> [ <text:line-break/><text:span text:style-name="T1"> </text:span><text:span text:style-name="T2">(85/4) </text:span> [ <text:line-break/><text:span text:style-name="T1"> </text:span><text:span text:style-name="T2">(85/5) </text:span> [ <text:line-break/><text:span text:style-name="T1"> </text:span><text:span text:style-name="T2">(85/6) </text:span> [ ]..[...].· <text:line-break/><text:span text:style-name="T1"> </text:span><text:span text:style-name="T2">(85/7) </text:span> [ ]ⲉ̣ⲓⲙⲉ ⲇⲉ <text:line-break/><text:span text:style-name="T1"> </text:span><text:span text:style-name="T2">(85/8) </text:span> [ ] ⲙⲛ ϯⲙⲛⲧ‐ <text:line-break/><text:span text:style-name="T1"> </text:span><text:span text:style-name="T2">(85/9) </text:span> [..... ⲁ]ⲩⲱ ϯ[ⲙⲛⲧ’ⲧⲉ]ⲗⲓⲟⲥ <text:line-break/><text:span text:style-name="T1"> </text:span><text:span text:style-name="T2">(85/10) </text:span> [...ⲉ]ⲛⲉⲣⲅⲓ ⲇⲉ [ⲙⲙ]ⲟ̣ϥ ⲁⲩⲱ <text:line-break/><text:span text:style-name="T1"> </text:span><text:span text:style-name="T2">(85/11) </text:span> [....]ⲕϥ ⲡⲓϣⲟⲣⲡ’̣ ⲛ ⲕ̅ⲗ̅ⲥ̅ <text:line-break/><text:span text:style-name="T1"> </text:span><text:span text:style-name="T2">(85/12) </text:span> [....]ⲧⲉ ⲛⲧⲟⲟⲩ ⲧⲏⲣⲟⲩ ϯ‐ <text:line-break/><text:span text:style-name="T1"> </text:span><text:span text:style-name="T2">(85/13) </text:span> [ϩⲩⲡ]ⲁⲣⲝⲓⲥ ⲙⲛ ϯⲉⲛⲉⲣⲅⲓⲁ <text:line-break/><text:span text:style-name="T1"> </text:span><text:span text:style-name="T2">(85/14) </text:span> ϯ̣[ⲙ]ⲛⲧ’ⲛⲟⲩⲧⲉ ⲡⲓⲅⲉⲛⲟⲥ <text:line-break/><text:span text:style-name="T1"> </text:span><text:span text:style-name="T2">(85/15) </text:span> ⲁⲩⲱ ⲡⲓⲉⲓⲇⲟⲥ· ⲛⲓϭⲟⲙ ⲇⲉ <text:line-break/><text:span text:style-name="T1"> </text:span><text:span text:style-name="T2">(85/16) </text:span> ⲟ̣ⲩⲁ ⲛⲉ ⲁⲩⲱ ⲛϩⲣⲁⲓ̈ ϩⲛ ⲟⲩ‐ <text:line-break/><text:span text:style-name="T1"> </text:span><text:span text:style-name="T2">(85/17) </text:span> [ⲁ] ϫ̣ⲉ ϥⲉ ⲛ ⲟⲩⲁ· ⲉⲧⲉ ⲡⲁⲓ̈ ⲡⲉ <text:line-break/><text:span text:style-name="T1"> </text:span><text:span text:style-name="T2">(85/18) </text:span> ⲛⲟⲩⲙⲉⲣⲓⲕⲟⲛ ⲁⲛ ⲁⲗⲗⲁ <text:line-break/><text:span text:style-name="T1"> </text:span><text:span text:style-name="T2">(85/19) </text:span> ⲛⲏ ⲛⲧⲉ ⲡⲧ̣[ⲏⲣ]ϥ· ʹ264 ϫⲉ ⲟⲩ <text:line-break/><text:span text:style-name="T1"> </text:span><text:span text:style-name="T2">(85/20) </text:span> ⲡ̣ⲉ ⲡⲓⲟⲩⲁ ⲉⲧⲉ ϯϩⲉ[ⲛ]ⲛⲁⲥ <text:line-break/><text:span text:style-name="T1"> </text:span><text:span text:style-name="T2">(85/21) </text:span> ⲧⲉ ⲁ[ⲩ]ⲱ ⲉⲃⲟ̣ⲗ̣ ϩⲓⲧⲛ ϯⲉⲛⲉⲣ‐ <text:line-break/><text:span text:style-name="T1"> </text:span><text:span text:style-name="T2">(85/22) </text:span> ⲅⲓⲁ [..]ⲁ̣ⲥ[....]ⲙ̣ⲛⲧ’ⲱⲛϩ <text:line-break/><text:span text:style-name="T1"> </text:span><text:span text:style-name="T2">(85/23) </text:span> ⲙⲛ̣[....].[....] ⲡⲉ ⲛⲧⲉ <text:line-break/><text:soft-page-break/><text:span text:style-name="T1"> </text:span><text:span text:style-name="T2">(85/24) </text:span> [ ]ⲧⲏⲣϥ ⲇⲉ <text:line-break/><text:span text:style-name="T1"> </text:span><text:span text:style-name="T2">(86/1) </text:span> [ <text:line-break/><text:span text:style-name="T1"> </text:span><text:span text:style-name="T2">(86/2) </text:span> [ <text:line-break/><text:span text:style-name="T1"> </text:span><text:span text:style-name="T2">(86/3) </text:span> .[ <text:line-break/><text:span text:style-name="T1"> </text:span><text:span text:style-name="T2">(86/4) </text:span> ⲡ[ <text:line-break/><text:span text:style-name="T1"> </text:span><text:span text:style-name="T2">(86/5) </text:span> [ <text:line-break/><text:span text:style-name="T1"> </text:span><text:span text:style-name="T2">(86/6) </text:span> ⲃ[ <text:line-break/><text:span text:style-name="T1"> </text:span><text:span text:style-name="T2">(86/7) </text:span> ⲉ̣[ <text:line-break/><text:span text:style-name="T1"> </text:span><text:span text:style-name="T2">(86/8) </text:span> ϭⲟ̣ⲙ ⲁ[ <text:line-break/><text:span text:style-name="T1"> </text:span><text:span text:style-name="T2">(86/9) </text:span> ⲧⲉ ⲙ ⲡⲣⲏ̣[ⲧⲉ <text:line-break/><text:span text:style-name="T1"> </text:span><text:span text:style-name="T2">(86/10) </text:span> ⲡⲁⲣ[.....]ⲉⲥⲑⲏ̣[ⲧⲟⲛ <text:line-break/><text:span text:style-name="T1"> </text:span><text:span text:style-name="T2">(86/11) </text:span> ⲙⲉⲛ .[.ⲡ]ⲁⲛⲧⲉⲗⲓ[ⲟⲥ <text:line-break/><text:span text:style-name="T1"> </text:span><text:span text:style-name="T2">(86/12) </text:span> ⲙⲁⲩ ⲉⲁⲥ̣ϫⲟⲟⲥ ⲉⲥⲟ̣[ <text:line-break/><text:span text:style-name="T1"> </text:span><text:span text:style-name="T2">(86/13) </text:span> ϫⲉ ⲛⲧⲕⲟⲩⲛⲟϭ ⲁ̅ⲫ̅ⲣ̅[̅ⲏ̅ⲇ̅ⲱ̅ⲛ̅] <text:line-break/><text:span text:style-name="T1"> </text:span><text:span text:style-name="T2">(86/14) </text:span> ⲛⲧⲕⲟⲩⲧⲉⲗⲓⲟⲥ ⲛ̅ⲉ̅ⲫ̅[̅ⲣ̅ⲏ̅ⲇ̅ⲱ̅ⲛ̅] <text:line-break/><text:span text:style-name="T1"> </text:span><text:span text:style-name="T2">(86/15) </text:span> ⲉⲥϫⲱ ⲙⲙⲟⲥ ⲉ ⲧⲉϥϩⲩⲡ̣[ⲁ]ⲣ̣‐ <text:line-break/><text:span text:style-name="T1"> </text:span><text:span text:style-name="T2">(86/16) </text:span> ⲝⲓⲥ ϫⲉ ⲛⲧⲕⲟⲩⲛⲟϭ ⲇ̅ⲏ̅ⲓ̅̈̅ⲫ̅ⲁ̅[ <text:line-break/><text:span text:style-name="T1"> </text:span><text:span text:style-name="T2">(86/17) </text:span> ϯⲉⲛⲉⲣⲅⲓⲁ ⲛⲧⲁϥ ⲙⲛ ⲟⲩⲱⲛ̣[ϩ] <text:line-break/><text:span text:style-name="T1"> </text:span><text:span text:style-name="T2">(86/18) </text:span> ⲁⲩⲱ ⲟⲩⲙⲛⲧ’ⲛⲟⲩⲧⲉ ⲧ̣[ⲉ] <text:line-break/><text:span text:style-name="T1"> </text:span><text:span text:style-name="T2">(86/19) </text:span> ⲛⲧⲕⲟⲩⲛⲟϭ ϩ̅ⲁ̅ⲣ̅ⲙ̅ⲏ̅ⲇ̅ⲱ̅[̅ⲛ̅ <text:line-break/><text:span text:style-name="T1"> </text:span><text:span text:style-name="T2">(86/20) </text:span> ⲡⲁⲛⲓⲉⲟⲟⲩ [ⲧ]ⲏ̣[ⲣ]ⲟⲩ ⲉ̅ⲡ̅ⲓ̅ⲫ̅[̅ⲁ̅ <text:line-break/><text:span text:style-name="T1"> </text:span><text:span text:style-name="T2">(86/21) </text:span> ⲧⲉϥⲙⲛⲧ’ⲙ̣[ⲁ]ⲕⲁⲣⲓ[ⲟⲥ ⲇⲉ ⲙⲛ̣ <text:line-break/><text:span text:style-name="T1"> </text:span><text:span text:style-name="T2">(86/22) </text:span> ϯⲙⲛⲧ’ⲧⲉⲗ[ⲓⲟ]ⲥ ⲛ[ⲧⲉ] ϯⲙⲛⲧ‐ <text:line-break/><text:span text:style-name="T1"> </text:span><text:span text:style-name="T2">(86/23) </text:span> ⲟⲩⲱⲧ’· .[...]ⲁ̣ⲟ[..]ⲟ̣ⲩ ⲟ̣[ⲩ <text:line-break/><text:span text:style-name="T1"> </text:span><text:span text:style-name="T2">(86/24) </text:span> ⲧⲏⲣϥ ϩⲓ ⲟ[ <text:line-break/><text:span text:style-name="T1"> </text:span><text:span text:style-name="T2">(87/1) </text:span> [ ] <text:line-break/><text:span text:style-name="T1"> </text:span><text:span text:style-name="T2">(87/2) </text:span> [ ]ⲁ̣ <text:line-break/><text:span text:style-name="T1"> </text:span><text:span text:style-name="T2">(87/3) </text:span> [ ] <text:line-break/><text:span text:style-name="T1"> </text:span><text:span text:style-name="T2">(87/4) </text:span> [ ] <text:line-break/><text:span text:style-name="T1"> </text:span><text:span text:style-name="T2">(87/5) </text:span> [ ] <text:line-break/><text:span text:style-name="T1"> </text:span><text:span text:style-name="T2">(87/6) </text:span> [ ]ⲁ̣ <text:line-break/><text:span text:style-name="T1"> </text:span><text:span text:style-name="T2">(87/7) </text:span> [ ]. ϣⲁ ⲉⲛ̣ⲉϩ <text:line-break/><text:span text:style-name="T1"> </text:span><text:span text:style-name="T2">(87/8) </text:span> [.......].[...] ⲛ ⲛⲟⲉ̣ⲣ̣ⲟⲛ <text:line-break/><text:span text:style-name="T1"> </text:span><text:span text:style-name="T2">(87/9) </text:span> [......]ⲉϩⲛ[..].[ⲧⲉⲗ]ⲓ̣ⲟⲥ <text:line-break/><text:span text:style-name="T1"> </text:span><text:span text:style-name="T2">(87/10) </text:span> [ϯ ⲃ̅ⲁ̅ⲣ̅ⲃ̅]̅ⲏ̅ⲗ̅ⲱ̅ ⲙ ⲡ̣[ⲁⲣⲑⲉ]ⲛⲟⲥ <text:line-break/><text:span text:style-name="T1"> </text:span><text:span text:style-name="T2">(87/11) </text:span> [ⲉⲃⲟⲗ] ϩⲓⲧⲟⲟⲧⲥ ⲛ̣ ϯⲙⲛⲧ’ϩⲁ‐ <text:line-break/><text:span text:style-name="T1"> </text:span><text:span text:style-name="T2">(87/12) </text:span> [ⲡⲗⲟ]ⲩⲥ ⲛⲧⲉ ϯⲙⲛⲧ’ⲙⲁⲕⲁ‐ <text:line-break/><text:span text:style-name="T1"> </text:span><text:span text:style-name="T2">(87/13) </text:span> [ⲣⲓⲟⲥ] ⲛⲧⲉ ⲡⲓϣⲙⲧ’ϭⲟⲙ ⲛ <text:line-break/><text:span text:style-name="T1"> </text:span><text:span text:style-name="T2">(87/14) </text:span> [ⲁϩⲟ]ⲣⲁⲧ[ⲟ]ⲛ ⲙ ⲡ̅ⲛ̅ⲁ̅· ⲧⲏ ⲉ‐ <text:line-break/><text:span text:style-name="T1"> </text:span><text:span text:style-name="T2">(87/15) </text:span> ⲧⲁⲥⲉⲓⲙⲉ ⲉ ⲡⲏ ⲉⲧⲙⲙⲁⲩ <text:line-break/><text:span text:style-name="T1"> </text:span><text:span text:style-name="T2">(87/16) </text:span> ⲁ̣ⲥⲉⲓⲙⲉ ⲉⲣⲟⲥ· ⲡⲏ ⲇⲉ ⲉϥⲉ <text:line-break/><text:span text:style-name="T1"> </text:span><text:span text:style-name="T2">(87/17) </text:span> ⲛ̣ ⲟⲩⲁ ⲛⲥⲁ ⲥ̣ⲁ ⲛⲓⲙ ⲉϥⲉ ⲛ‐ <text:line-break/><text:span text:style-name="T1"> </text:span><text:span text:style-name="T2">(87/18) </text:span> ⲛ̣ ⲁⲧ’ⲡⲱⲣϫ ⲉⲣⲟϥ ⲉⲁϥⲛ <text:line-break/><text:span text:style-name="T1"> </text:span><text:span text:style-name="T2">(87/19) </text:span> [..]. ⲁ̣ϥϩⲟ[..]ⲟ̣ⲥ ⲛⲥⲉ[ⲓ]ⲙⲉ <text:line-break/><text:span text:style-name="T1"> </text:span><text:span text:style-name="T2">(87/20) </text:span> [ⲉⲣⲟⲥ ⲉ]ⲩⲉ̣ⲛⲉⲣⲅⲓⲁ ⲛⲧⲁϥ <text:line-break/><text:span text:style-name="T1"> </text:span><text:span text:style-name="T2">(87/21) </text:span> [ⲧⲉ...]ⲉⲧ[.] ⲛϥⲉⲓⲙⲉ ⲉ <text:line-break/><text:span text:style-name="T1"> </text:span><text:span text:style-name="T2">(87/22) </text:span> [.....]ⲟ̣[....] ⲉⲩⲉⲓⲙⲉ <text:line-break/><text:soft-page-break/><text:span text:style-name="T1"> </text:span><text:span text:style-name="T2">(87/23) </text:span> [.........] ⲛ̣ϩⲣⲁⲓ̈ ϩⲛ ⲕⲉ‐ <text:line-break/><text:span text:style-name="T1"> </text:span><text:span text:style-name="T2">(88/1) </text:span> [ <text:line-break/><text:span text:style-name="T1"> </text:span><text:span text:style-name="T2">(88/2) </text:span> [ <text:line-break/><text:span text:style-name="T1"> </text:span><text:span text:style-name="T2">(88/3) </text:span> [ <text:line-break/><text:span text:style-name="T1"> </text:span><text:span text:style-name="T2">(88/4) </text:span> ⲗ <text:line-break/><text:span text:style-name="T1"> </text:span><text:span text:style-name="T2">(88/5) </text:span> .[ <text:line-break/><text:span text:style-name="T1"> </text:span><text:span text:style-name="T2">(88/6) </text:span> ϩ̣[ <text:line-break/><text:span text:style-name="T1"> </text:span><text:span text:style-name="T2">(88/7) </text:span> ⲉ̣[ <text:line-break/><text:span text:style-name="T1"> </text:span><text:span text:style-name="T2">(88/8) </text:span> ⲙ[ <text:line-break/><text:span text:style-name="T1"> </text:span><text:span text:style-name="T2">(88/9) </text:span> ⲥⲙⲟⲩ ⲉ̣[ <text:line-break/><text:span text:style-name="T1"> </text:span><text:span text:style-name="T2">(88/10) </text:span> ϫⲉ .[.].ⲃ̅ⲏ̅[̅ⲣ̅]̅ⲓ̣̅̅[̅ⲑ̅ⲉ̅ⲩ̅ ⲉⲣⲓⲅⲉⲛⲁⲟⲡ <text:line-break/><text:span text:style-name="T1"> </text:span><text:span text:style-name="T2">(88/11) </text:span> ⲱ̅ⲣ̅[ⲓⲙⲉⲛⲓ]ⲉ· ⲁ̅ⲣ̅[̅ⲁ̅ⲙ̅ⲉ̅ⲛ̅] <text:line-break/><text:span text:style-name="T1"> </text:span><text:span text:style-name="T2">(88/12) </text:span> ⲁⲗⲫⲗ[ⲉⲅ]ⲉ· ⲏ̅ⲗ̅ⲓ̅ⲗ̅ⲓ̅ⲟ̣̅̅[ⲩⲫⲉⲩ] <text:line-break/><text:span text:style-name="T1"> </text:span><text:span text:style-name="T2">(88/13) </text:span> ⲗ̅ⲁ̅ⲗ̅ⲁ̅ⲙ̅ⲉ̅ⲩ̅· ⲛ̅ⲟⲏⲑⲉⲩ̣̅[ <text:line-break/><text:span text:style-name="T1"> </text:span><text:span text:style-name="T2">(88/14) </text:span> ⲟⲩⲛⲟϭ ⲡⲉ ⲡⲉⲕⲣⲁⲛ ⲁ[ <text:line-break/><text:span text:style-name="T1"> </text:span><text:span text:style-name="T2">(88/15) </text:span> ϥϫⲟⲟⲣ· ⲡⲏ ⲉⲧ’[ⲉ]ⲓ̣ⲙⲉ̣ [ⲉ]‐ <text:line-break/><text:span text:style-name="T1"> </text:span><text:span text:style-name="T2">(88/16) </text:span> ϥⲓⲙⲉ ⲉ ⲛⲁⲓ̈ ⲧⲏⲣⲟⲩ· ⲛⲧ[ⲕ]‐ <text:line-break/><text:span text:style-name="T1"> </text:span><text:span text:style-name="T2">(88/17) </text:span> ⲟⲩⲁ ⲛⲧⲕⲟⲩⲁ ⲥ̣ⲓ̅ⲟ̅ⲩ̅ ⲉ̅.̅[ <text:line-break/><text:span text:style-name="T1"> </text:span><text:span text:style-name="T2">(88/18) </text:span> ⲁ̅ⲫ̅ⲣ̅ⲏ̅ⲇ̅ⲱ̅ⲛ̅ ⲛⲧⲟⲕ ⲡⲉ ⲡ[ⲓⲉ]‐ <text:line-break/><text:span text:style-name="T1"> </text:span><text:span text:style-name="T2">(88/19) </text:span> ⲱⲛ ⲛⲧⲉ ⲛⲓⲉ̣ⲱⲛ ⲛⲧⲉ ⲡ[ⲓ]‐ <text:line-break/><text:span text:style-name="T1"> </text:span><text:span text:style-name="T2">(88/20) </text:span> ⲛⲟϭ ⲛ ⲧⲉⲗ[ⲓⲟ]ⲥ̣ ⲡⲓϣ[ⲟⲣ]ⲡ̣ <text:line-break/><text:span text:style-name="T1"> </text:span><text:span text:style-name="T2">(88/21) </text:span> ⲛ ⲕ̅ⲗ̅ⲥ̣̅̅ ⲛⲧⲉ ϯ[ⲙ]ⲉϩ.[ <text:line-break/><text:span text:style-name="T1"> </text:span><text:span text:style-name="T2">(88/22) </text:span> ⲛⲛ ⲉⲛⲉⲣⲅⲓⲁ̣ [ⲁ]ⲩⲱ̣ [ <text:line-break/><text:span text:style-name="T1"> </text:span><text:span text:style-name="T2">(88/23) </text:span> ⲧⲁⲛ ⲡⲉ ⲛ ⲁ̣[..]ⲁ[ <text:line-break/><text:span text:style-name="T1"> </text:span><text:span text:style-name="T2">(88/24) </text:span> ⲡⲉϥⲉⲓⲛ̣ⲉ̣ [ <text:line-break/><text:span text:style-name="T1"> </text:span><text:span text:style-name="T2">(88/25) </text:span> ⲛⲧⲁϥ ⲉϥ.[ <text:line-break/><text:span text:style-name="T1"> </text:span><text:span text:style-name="T2">(89/1) </text:span> [ <text:line-break/><text:span text:style-name="T1"> </text:span><text:span text:style-name="T2">(89/2) </text:span> [ <text:line-break/><text:span text:style-name="T1"> </text:span><text:span text:style-name="T2">(89/3) </text:span> [ <text:line-break/><text:span text:style-name="T1"> </text:span><text:span text:style-name="T2">(89/4) </text:span> [ ]ⲙ <text:line-break/><text:span text:style-name="T1"> </text:span><text:span text:style-name="T2">(89/5) </text:span> [ ]ϣⲟ <text:line-break/><text:span text:style-name="T1"> </text:span><text:span text:style-name="T2">(89/6) </text:span> [ <text:line-break/><text:span text:style-name="T1"> </text:span><text:span text:style-name="T2">(89/7) </text:span> [ <text:line-break/><text:span text:style-name="T1"> </text:span><text:span text:style-name="T2">(89/8) </text:span> [ ]. <text:line-break/><text:span text:style-name="T1"> </text:span><text:span text:style-name="T2">(89/9) </text:span> [ ϩⲩⲡⲁⲣ]ⲝⲓ[ⲥ <text:line-break/><text:span text:style-name="T1"> </text:span><text:span text:style-name="T2">(89/10) </text:span> [ ] ⲁ̣ⲩⲱ ⲉϥ‐ <text:line-break/><text:span text:style-name="T1"> </text:span><text:span text:style-name="T2">(89/11) </text:span> [ ]ⲩ̣ⲧⲉ <text:line-break/><text:span text:style-name="T1"> </text:span><text:span text:style-name="T2">(89/12) </text:span> [ ]ϣⲱ <text:line-break/><text:span text:style-name="T1"> </text:span><text:span text:style-name="T2">(89/13) </text:span> [ ]ⲡ̣ⲉ ϩⲛ <text:line-break/><text:span text:style-name="T1"> </text:span><text:span text:style-name="T2">(89/14) </text:span> [ ⲡ]ⲓ̣ⲉⲟ‐ <text:line-break/><text:span text:style-name="T1"> </text:span><text:span text:style-name="T2">(89/15) </text:span> [ⲟⲩ ϩ]ⲉⲛⲉⲟⲟⲩ <text:line-break/><text:span text:style-name="T1"> </text:span><text:span text:style-name="T2">(89/16) </text:span> [ ]ⲡ̣ⲟⲥ· ⲟⲩ‐ <text:line-break/><text:span text:style-name="T1"> </text:span><text:span text:style-name="T2">(89/17) </text:span> [ ] ϩⲛ <text:line-break/><text:span text:style-name="T1"> </text:span><text:span text:style-name="T2">(89/18) </text:span> [ ]ⲧ̣ⲏ <text:line-break/><text:span text:style-name="T1"> </text:span><text:span text:style-name="T2">(89/19) </text:span> [ <text:line-break/><text:span text:style-name="T1"> </text:span><text:span text:style-name="T2">(89/20) </text:span> [ ].ⲛ <text:line-break/><text:span text:style-name="T1"> </text:span><text:span text:style-name="T2">(89/21) </text:span> [ ]ⲉⲱⲛ <text:line-break/><text:soft-page-break/><text:span text:style-name="T1"> </text:span><text:span text:style-name="T2">(89/22) </text:span> [ ]ⲟⲓⲁ <text:line-break/><text:span text:style-name="T1"> </text:span><text:span text:style-name="T2">(89/23) </text:span> [ ]ⲏⲟⲩ <text:line-break/><text:span text:style-name="T1"> </text:span><text:span text:style-name="T2">(89/24) </text:span> [ ]ⲟⲩⲧⲉ <text:line-break/><text:span text:style-name="T1"> </text:span><text:span text:style-name="T2">(90/1) </text:span> [ <text:line-break/><text:span text:style-name="T1"> </text:span><text:span text:style-name="T2">(90/2) </text:span> [ <text:line-break/><text:span text:style-name="T1"> </text:span><text:span text:style-name="T2">(90/3) </text:span> [ <text:line-break/><text:span text:style-name="T1"> </text:span><text:span text:style-name="T2">(90/4) </text:span> [ <text:line-break/><text:span text:style-name="T1"> </text:span><text:span text:style-name="T2">(90/5) </text:span> [ <text:line-break/><text:span text:style-name="T1"> </text:span><text:span text:style-name="T2">(90/6) </text:span> [ <text:line-break/><text:span text:style-name="T1"> </text:span><text:span text:style-name="T2">(90/7) </text:span> [ <text:line-break/><text:span text:style-name="T1"> </text:span><text:span text:style-name="T2">(90/8) </text:span> [ <text:line-break/><text:span text:style-name="T1"> </text:span><text:span text:style-name="T2">(90/9) </text:span> ϣⲟⲟ̣[ⲡ <text:line-break/><text:span text:style-name="T1"> </text:span><text:span text:style-name="T2">(90/10) </text:span> ⲡⲉ̣ ⲛ ⲁ̣[ <text:line-break/><text:span text:style-name="T1"> </text:span><text:span text:style-name="T2">(90/11) </text:span> ⲛ [ <text:line-break/><text:span text:style-name="T1"> </text:span><text:span text:style-name="T2">(90/12) </text:span> ⲙ[ⲛ <text:line-break/><text:span text:style-name="T1"> </text:span><text:span text:style-name="T2">(90/13) </text:span> ⲕⲁ[ <text:line-break/><text:span text:style-name="T1"> </text:span><text:span text:style-name="T2">(90/14) </text:span> ⲛⲉ̣[ <text:line-break/><text:span text:style-name="T1"> </text:span><text:span text:style-name="T2">(90/15) </text:span> ⲙⲛⲧ’.[ <text:line-break/><text:span text:style-name="T1"> </text:span><text:span text:style-name="T2">(90/16) </text:span> ⲙⲁⲕ[ⲁⲣⲓⲟⲥ <text:line-break/><text:span text:style-name="T1"> </text:span><text:span text:style-name="T2">(90/17) </text:span> ⲛ ⲛ[ <text:line-break/><text:span text:style-name="T1"> </text:span><text:span text:style-name="T2">(90/18) </text:span> ⲗⲓ[ⲟⲥ <text:line-break/><text:span text:style-name="T1"> </text:span><text:span text:style-name="T2">(90/19) </text:span> ⲣ[ <text:line-break/><text:span text:style-name="T1"> </text:span><text:span text:style-name="T2">(90/20) </text:span> ⲧ[ <text:line-break/><text:span text:style-name="T1"> </text:span><text:span text:style-name="T2">(90/21) </text:span> ⲉⲛⲁ[ <text:line-break/><text:span text:style-name="T1"> </text:span><text:span text:style-name="T2">(90/22) </text:span> ⲛⲧⲉ[ <text:line-break/><text:span text:style-name="T1"> </text:span><text:span text:style-name="T2">(90/23) </text:span> ⲉⲟ̣[ <text:line-break/><text:span text:style-name="T1"> </text:span><text:span text:style-name="T2">(90/24) </text:span> ⲱⲛϩ [ <text:line-break/><text:span text:style-name="T1"> </text:span><text:span text:style-name="T2">(90/25) </text:span> ⲉϣ.[ <text:line-break/><text:span text:style-name="T1"> </text:span><text:span text:style-name="T2">(91/1) </text:span> [ <text:line-break/><text:span text:style-name="T1"> </text:span><text:span text:style-name="T2">(91/2) </text:span> [ <text:line-break/><text:span text:style-name="T1"> </text:span><text:span text:style-name="T2">(91/3) </text:span> [ <text:line-break/><text:span text:style-name="T1"> </text:span><text:span text:style-name="T2">(91/4) </text:span> [ <text:line-break/><text:span text:style-name="T1"> </text:span><text:span text:style-name="T2">(91/5) </text:span> [ <text:line-break/><text:span text:style-name="T1"> </text:span><text:span text:style-name="T2">(91/6) </text:span> [ <text:line-break/><text:span text:style-name="T1"> </text:span><text:span text:style-name="T2">(91/7) </text:span> [ <text:line-break/><text:span text:style-name="T1"> </text:span><text:span text:style-name="T2">(91/8) </text:span> [ ]ⲉ <text:line-break/><text:span text:style-name="T1"> </text:span><text:span text:style-name="T2">(91/9) </text:span> [ ]ⲛ ⲛⲟⲩⲧⲉ <text:line-break/><text:span text:style-name="T1"> </text:span><text:span text:style-name="T2">(91/10) </text:span> [ ].ⲧⲉ ⲉⲃⲟⲗ· <text:line-break/><text:span text:style-name="T1"> </text:span><text:span text:style-name="T2">(91/11) </text:span> [......]..[......].[.]ⲱϥ <text:line-break/><text:span text:style-name="T1"> </text:span><text:span text:style-name="T2">(91/12) </text:span> [.....]ⲙⲡⲓⲙ[.....]ⲧ̣ⲉ <text:line-break/><text:span text:style-name="T1"> </text:span><text:span text:style-name="T2">(91/13) </text:span> [.....]ⲩ̣ⲉⲉⲧ[...]ϣⲟⲣⲡ’ <text:line-break/><text:span text:style-name="T1"> </text:span><text:span text:style-name="T2">(91/14) </text:span> [...]ⲙⲉⲉⲣ[..] ⲙⲛ ϩⲉⲛϭⲟⲙ <text:line-break/><text:span text:style-name="T1"> </text:span><text:span text:style-name="T2">(91/15) </text:span> [..]ⲣⲉϥ[....]ⲡ’ ⲉⲣⲟϥ ⲙ ⲡⲁⲛ‐ <text:line-break/><text:span text:style-name="T1"> </text:span><text:span text:style-name="T2">(91/16) </text:span> [ⲧⲉⲗⲓ]ⲟⲥ [....]ⲥⲙ ⲛⲉ ⲛⲧⲉ <text:line-break/><text:span text:style-name="T1"> </text:span><text:span text:style-name="T2">(91/17) </text:span> [ⲛ]ⲁ̣ⲓ̈ ⲧⲏⲣ[ⲟⲩ] ⲁⲩⲱ ⲟⲩⲗⲟⲓ̈‐ <text:line-break/><text:span text:style-name="T1"> </text:span><text:span text:style-name="T2">(91/18) </text:span> [ϭ]ⲉ ⲛⲧⲁ[ ⲧ]ⲏⲣⲟⲩ ⲉⲩⲙⲛⲧ’‐ <text:line-break/><text:span text:style-name="T1"> </text:span><text:span text:style-name="T2">(91/19) </text:span> [.].[..]ⲟⲥ[...].[..]ⲃ̣̅̅ⲁ̅ⲣ̅ⲃ̅ⲏ̅ⲗ̅ⲱ̅ <text:line-break/><text:soft-page-break/><text:span text:style-name="T1"> </text:span><text:span text:style-name="T2">(91/20) </text:span> [...]ϥⲱⲡ[...]. ⲉ̣[ⲣ]ⲟϥ ⲁⲩⲱ <text:line-break/><text:span text:style-name="T1"> </text:span><text:span text:style-name="T2">(91/21) </text:span> [....].ⲁϥ̣[.] ⲛⲁⲓ̈ ⲧⲏⲣ̣ⲟⲩ ⲛ <text:line-break/><text:span text:style-name="T1"> </text:span><text:span text:style-name="T2">(91/22) </text:span> [.....]ⲏⲧ̣[.]ⲉⲙⲡϥⲕ̣ⲁⲗⲁ <text:line-break/><text:span text:style-name="T1"> </text:span><text:span text:style-name="T2">(91/23) </text:span> [.........] ⲙ̣ⲛ ⲧⲉϥⲙⲛⲧ’‐ <text:line-break/><text:span text:style-name="T1"> </text:span><text:span text:style-name="T2">(91/24) </text:span> [ ]ϣⲱⲡⲉ <text:line-break/><text:span text:style-name="T1"> </text:span><text:span text:style-name="T2">(91/25) </text:span> [.........]ⲡ̣· ⲁⲗⲗⲁ <text:line-break/><text:span text:style-name="T1"> </text:span><text:span text:style-name="T2">(92/1) </text:span> [ <text:line-break/><text:span text:style-name="T1"> </text:span><text:span text:style-name="T2">(92/2) </text:span> [ <text:line-break/><text:span text:style-name="T1"> </text:span><text:span text:style-name="T2">(92/3) </text:span> [ <text:line-break/><text:span text:style-name="T1"> </text:span><text:span text:style-name="T2">(92/4) </text:span> [ <text:line-break/><text:span text:style-name="T1"> </text:span><text:span text:style-name="T2">(92/5) </text:span> [ <text:line-break/><text:span text:style-name="T1"> </text:span><text:span text:style-name="T2">(92/6) </text:span> [ <text:line-break/><text:span text:style-name="T1"> </text:span><text:span text:style-name="T2">(92/7) </text:span> [ <text:line-break/><text:span text:style-name="T1"> </text:span><text:span text:style-name="T2">(92/8) </text:span> .[ <text:line-break/><text:span text:style-name="T1"> </text:span><text:span text:style-name="T2">(92/9) </text:span> [ <text:line-break/><text:span text:style-name="T1"> </text:span><text:span text:style-name="T2">(92/10) </text:span> ⲛⲧⲉ ⲛ[ <text:line-break/><text:span text:style-name="T1"> </text:span><text:span text:style-name="T2">(92/11) </text:span> ⲉⲃⲟ[ⲗ]..[ <text:line-break/><text:span text:style-name="T1"> </text:span><text:span text:style-name="T2">(92/12) </text:span> ⲁⲩ[ⲱ ...]ϣⲱ.[ <text:line-break/><text:span text:style-name="T1"> </text:span><text:span text:style-name="T2">(92/13) </text:span> ⲛⲧⲁⲥ[...]ⲩ ⲛ ⲥ.[ <text:line-break/><text:span text:style-name="T1"> </text:span><text:span text:style-name="T2">(92/14) </text:span> ⲟⲩⲱⲧ’· [....]ⲏⲉⲧ[ <text:line-break/><text:span text:style-name="T1"> </text:span><text:span text:style-name="T2">(92/15) </text:span> ⲙⲛ ⲟⲩⲙ[.....].ⲙ[ <text:line-break/><text:span text:style-name="T1"> </text:span><text:span text:style-name="T2">(92/16) </text:span> ⲛϩⲣⲁⲓ̈ ϩⲛ ⲟ[ⲩ...]ϩⲁ[ <text:line-break/><text:span text:style-name="T1"> </text:span><text:span text:style-name="T2">(92/17) </text:span> ⲕⲁⲧⲁ ⲡⲓⲛⲟⲏ[ⲙⲁ] ⲉⲧ’ϣ[ⲟⲟⲡ’] <text:line-break/><text:span text:style-name="T1"> </text:span><text:span text:style-name="T2">(92/18) </text:span> ⲟⲛⲧⲱ̣[ⲥ..] ⲉⲧ̣[ϣⲟ]ⲟⲡ’ ⲛ [ <text:line-break/><text:span text:style-name="T1"> </text:span><text:span text:style-name="T2">(92/19) </text:span> ϯⲣⲁⲛ ⲉ̣[......] ⲛ [..]ⲁⲧ̣[ <text:line-break/><text:span text:style-name="T1"> </text:span><text:span text:style-name="T2">(92/20) </text:span> ⲥⲟⲩ[......]ⲡⲓⲛ[ <text:line-break/><text:span text:style-name="T1"> </text:span><text:span text:style-name="T2">(92/21) </text:span> ⲕⲗ̅ⲥ̅ ⲛ [......]ⲟ[ <text:line-break/><text:span text:style-name="T1"> </text:span><text:span text:style-name="T2">(92/22) </text:span> ⲡⲛ̅ⲟ̣̅[......]ⲛⲧ[ <text:line-break/><text:span text:style-name="T1"> </text:span><text:span text:style-name="T2">(92/23) </text:span> ϣⲙⲧ[.]ⲥ̣[ <text:line-break/><text:span text:style-name="T1"> </text:span><text:span text:style-name="T2">(92/24) </text:span> ⲛⲉ ⲛ [ <text:line-break/><text:span text:style-name="T1"> </text:span><text:span text:style-name="T2">(92/25) </text:span> ⲁⲗⲗⲁ [ <text:line-break/><text:span text:style-name="T1"> </text:span><text:span text:style-name="T2">(93/1) </text:span> ϯ ⲣⲁⲛ ⲉⲣⲟϥ ⲛⲁⲓ̈ ⲧⲏⲣⲟⲩ ϣⲁⲩ‐ <text:line-break/><text:span text:style-name="T1"> </text:span><text:span text:style-name="T2">(93/2) </text:span> ⲣ ⲡⲣⲏⲧⲉ ⲉⲩⲛⲛⲏⲩ ⲉⲃⲟ̣ⲗ̣ <text:line-break/><text:span text:style-name="T1"> </text:span><text:span text:style-name="T2">(93/3) </text:span> ϩⲙ ⲡⲏ ⲉⲧ’ⲑⲉⲃ[ⲓⲏ]ⲟ̣ⲩ̣ⲧ’· ⲉ̣‐ <text:line-break/><text:span text:style-name="T1"> </text:span><text:span text:style-name="T2">(93/4) </text:span> ϣ[ⲱ]ⲡ̣ⲉ ⲇⲉ ⲉⲕϣⲁⲛϯ ⲉⲟ̣ⲟ̣ⲩ <text:line-break/><text:span text:style-name="T1"> </text:span><text:span text:style-name="T2">(93/5) </text:span> ⲉⲧ[ⲃⲏ]ⲏ̣ⲧϥ· ⲉϣⲱ̣[ⲡⲉ] ⲇⲉ ⲉⲕ‐ <text:line-break/><text:span text:style-name="T1"> </text:span><text:span text:style-name="T2">(93/6) </text:span> ϣⲁ[ⲛ].ⲉⲉⲩⲧ̣[..ϩ]ⲩⲡⲁⲣ‐ <text:line-break/><text:span text:style-name="T1"> </text:span><text:span text:style-name="T2">(93/7) </text:span> ⲝ[ⲓⲥ...]ⲡϣ.[.....]ⲡⲉϥ‐ <text:line-break/><text:span text:style-name="T1"> </text:span><text:span text:style-name="T2">(93/8) </text:span> ϩ.[.....]ⲥ[.....]ⲛⲁ ⲛ ⲟⲩ‐ <text:line-break/><text:span text:style-name="T1"> </text:span><text:span text:style-name="T2">(93/9) </text:span> ⲟ̣[ ]ⲛ̣ ϩⲁⲡⲗⲟⲩⲛ <text:line-break/><text:span text:style-name="T1"> </text:span><text:span text:style-name="T2">(93/10) </text:span> .[ ]ⲛ <text:line-break/><text:span text:style-name="T1"> </text:span><text:span text:style-name="T2">(93/11) </text:span> [ ]ϥ· <text:line-break/><text:span text:style-name="T1"> </text:span><text:span text:style-name="T2">(93/12) </text:span> [ ]ⲉϥⲛⲁ <text:line-break/><text:span text:style-name="T1"> </text:span><text:span text:style-name="T2">(93/13) </text:span> [ ].ϥ· <text:line-break/><text:span text:style-name="T1"> </text:span><text:span text:style-name="T2">(93/14) </text:span> [ ].ⲡⲏ ⲉ <text:line-break/><text:span text:style-name="T1"> </text:span><text:span text:style-name="T2">(93/15) </text:span> [ ⲥⲟⲩ]ⲱⲛϥ <text:line-break/><text:span text:style-name="T1"> </text:span><text:span text:style-name="T2">(93/16) </text:span> [ ]ⲩ̣ⲧⲛ· ⲛ <text:line-break/><text:soft-page-break/><text:span text:style-name="T1"> </text:span><text:span text:style-name="T2">(93/17) </text:span> ϩⲣⲁ[ ] ⲛ ⲧⲉⲗⲓⲟⲥ <text:line-break/><text:span text:style-name="T1"> </text:span><text:span text:style-name="T2">(93/18) </text:span> ⲉϥⲉ̣[ ⲧⲉⲗ]ⲓⲟⲥ <text:line-break/><text:span text:style-name="T1"> </text:span><text:span text:style-name="T2">(93/19) </text:span> ⲁⲩⲱ̣[ ]ⲁⲉ <text:line-break/><text:span text:style-name="T1"> </text:span><text:span text:style-name="T2">(93/20) </text:span> ⲧⲛ̣ [ ]ϫⲱⲕ <text:line-break/><text:span text:style-name="T1"> </text:span><text:span text:style-name="T2">(93/21) </text:span> ⲉ̣[ ]ⲛⲙⲉ <text:line-break/><text:span text:style-name="T1"> </text:span><text:span text:style-name="T2">(93/22) </text:span> [ ]ⲡⲉϥ‐ <text:line-break/><text:span text:style-name="T1"> </text:span><text:span text:style-name="T2">(93/23) </text:span> [ ]ⲧⲁⲩ <text:line-break/><text:span text:style-name="T1"> </text:span><text:span text:style-name="T2">(93/24) </text:span> [ ]ⲁϥ· <text:line-break/><text:span text:style-name="T1"> </text:span><text:span text:style-name="T2">(93/25) </text:span> [ ].ⲁ̣ⲩ̣ ⲉ ϯ ⲙⲛ <text:line-break/><text:span text:style-name="T1"> </text:span><text:span text:style-name="T2">(93/26) </text:span> [ ]ⲛⲉⲧⲙ[. <text:line-break/><text:span text:style-name="T1"> </text:span><text:span text:style-name="T2">(94/1) </text:span> [ⲉ]ⲙⲡ̣ϥ̣ϭⲙ ϭⲟ̣ⲙ̣ ⲉ ⲛⲁⲩ ⲉⲣⲟⲥ <text:line-break/><text:span text:style-name="T1"> </text:span><text:span text:style-name="T2">(94/2) </text:span> ⲉⲧⲃⲉ ⲡⲁⲓ̈ ⲙⲙⲛ ϣϭⲟⲙ ⲉ ϫⲓ‐ <text:line-break/><text:span text:style-name="T1"> </text:span><text:span text:style-name="T2">(94/3) </text:span> ⲧϥ ⲙ ⲡⲉⲓ̈ⲣⲏⲧⲉ ⲛϩⲣⲁⲓ̈ ϩⲛ <text:line-break/><text:span text:style-name="T1"> </text:span><text:span text:style-name="T2">(94/4) </text:span> ⲟⲩⲧⲃⲃ[ⲟ] ⲛⲧⲉ ϯⲙ̣ⲛ̣ⲧⲛⲟϭ <text:line-break/><text:span text:style-name="T1"> </text:span><text:span text:style-name="T2">(94/5) </text:span> ⲉⲟⲩⲁⲡⲉ ⲛ ⲧⲉⲗ̣[ⲓⲟ]ⲥ ⲛⲧⲉ <text:line-break/><text:span text:style-name="T1"> </text:span><text:span text:style-name="T2">(94/6) </text:span> ⲡ[ⲏ ⲉ]ⲧ’ϩⲛ ⲟⲩⲉⲓ̣[...] ⲥⲛⲧⲉ <text:line-break/><text:span text:style-name="T1"> </text:span><text:span text:style-name="T2">(94/7) </text:span> ⲡ[......].ⲉⲉ[...].ⲥ̣ ⲉⲧⲉ <text:line-break/><text:span text:style-name="T1"> </text:span><text:span text:style-name="T2">(94/8) </text:span> ⲛ ⲟ̣[.......]ⲁⲛ̣[..ⲥⲟⲩ]ⲱⲛϥ <text:line-break/><text:span text:style-name="T1"> </text:span><text:span text:style-name="T2">(94/9) </text:span> ⲉⲧⲃⲉ̣[....]ⲥ̣[........]ϣⲁϫⲉ <text:line-break/><text:span text:style-name="T1"> </text:span><text:span text:style-name="T2">(94/10) </text:span> ⲙ[ⲙ]ⲟ̣ϥ̣ [ ].ⲉ <text:line-break/><text:span text:style-name="T1"> </text:span><text:span text:style-name="T2">(94/11) </text:span> ⲧⲉ̣[ <text:line-break/><text:span text:style-name="T1"> </text:span><text:span text:style-name="T2">(94/12) </text:span> ⲱⲛ[ <text:line-break/><text:span text:style-name="T1"> </text:span><text:span text:style-name="T2">(94/13) </text:span> ⲉⲧ.[ <text:line-break/><text:span text:style-name="T1"> </text:span><text:span text:style-name="T2">(94/14) </text:span> ϩⲓⲟ[ <text:line-break/><text:span text:style-name="T1"> </text:span><text:span text:style-name="T2">(94/15) </text:span> ⲙ ⲡⲉ[ ].ⲥ[ <text:line-break/><text:span text:style-name="T1"> </text:span><text:span text:style-name="T2">(94/16) </text:span> ⲉⲧ’ⲕⲱ̣[ ]ⲅⲁⲣ̣[ <text:line-break/><text:span text:style-name="T1"> </text:span><text:span text:style-name="T2">(94/17) </text:span> ⲛⲁⲛ ⲛ[ ]ⲩ ⲉⲣⲟϥ[ <text:line-break/><text:span text:style-name="T1"> </text:span><text:span text:style-name="T2">(94/18) </text:span> ⲧ[ ϣⲟⲟ]ⲡ’ ϩⲓ ⲟⲩⲙⲁ[ <text:line-break/><text:span text:style-name="T1"> </text:span><text:span text:style-name="T2">(94/19) </text:span> ⲧ[ ] ⲇⲉ ⲙⲙⲟ[ <text:line-break/><text:span text:style-name="T1"> </text:span><text:span text:style-name="T2">(94/20) </text:span> ⲕⲁ.[ ]ⲛ ϩⲓ..[ <text:line-break/><text:span text:style-name="T1"> </text:span><text:span text:style-name="T2">(94/21) </text:span> ⲕⲁ[ <text:line-break/><text:span text:style-name="T1"> </text:span><text:span text:style-name="T2">(94/22) </text:span> ⲕⲁ[ <text:line-break/><text:span text:style-name="T1"> </text:span><text:span text:style-name="T2">(94/23) </text:span> ⲛ̅ ⲧ[ <text:line-break/><text:span text:style-name="T1"> </text:span><text:span text:style-name="T2">(94/24) </text:span> ⲧⲁϥ[ <text:line-break/><text:span text:style-name="T1"> </text:span><text:span text:style-name="T2">(94/25) </text:span> .. ⲟⲩⲧⲉ̣[ <text:line-break/><text:span text:style-name="T1"> </text:span><text:span text:style-name="T2">(95/1) </text:span> ⲫⲟⲣⲁ ⲛⲧⲉ ⲛⲁⲓ̈ ⲙⲛ ϩⲉⲛⲁ̣ⲅ‐ <text:line-break/><text:span text:style-name="T1"> </text:span><text:span text:style-name="T2">(95/2) </text:span> ⲅⲉⲗⲟⲥ· ⲁⲩⲱ ϩⲉⲛⲇⲓⲁⲫⲟ‐ <text:line-break/><text:span text:style-name="T1"> </text:span><text:span text:style-name="T2">(95/3) </text:span> ⲣⲁ ⲛⲧⲉ ⲛⲁⲓ̈ ⲙⲛ ϩⲉⲛⲣⲱⲙⲉ <text:line-break/><text:span text:style-name="T1"> </text:span><text:span text:style-name="T2">(95/4) </text:span> ⲁⲩⲱ̣ [ϩⲉ]ⲛ̣ⲇⲓⲁⲫⲟⲣⲁ ⲛⲧⲉ <text:line-break/><text:span text:style-name="T1"> </text:span><text:span text:style-name="T2">(95/5) </text:span> ⲛⲁⲓ̈ [ⲙⲛ] ⲟⲩϩⲩⲡ[ⲁⲣ]ⲝ̣ⲓⲥ· <text:line-break/><text:span text:style-name="T1"> </text:span><text:span text:style-name="T2">(95/6) </text:span> ⲁⲩⲱ̣ [ϩⲉ]ⲛⲟ.[......]ⲟⲩ <text:line-break/><text:span text:style-name="T1"> </text:span><text:span text:style-name="T2">(95/7) </text:span> ⲥⲓ[......]ⲟ.[......]ⲛⲟⲩ <text:line-break/><text:span text:style-name="T1"> </text:span><text:span text:style-name="T2">(95/8) </text:span> ⲏ̣[.....] ⲙⲛ [ⲟⲩⲉⲥ]ⲑ̣ⲏⲥⲓⲥ <text:line-break/><text:span text:style-name="T1"> </text:span><text:span text:style-name="T2">(95/9) </text:span> [ ]ⲧⲱⲥ <text:line-break/><text:span text:style-name="T1"> </text:span><text:span text:style-name="T2">(95/10) </text:span> [ ]ⲛⲛⲏ <text:line-break/><text:span text:style-name="T1"> </text:span><text:span text:style-name="T2">(95/11) </text:span> [ ]ⲟ̣ⲛⲧⲱⲥ <text:line-break/><text:span text:style-name="T1"> </text:span><text:span text:style-name="T2">(95/12) </text:span> [ ]ⲟⲩ· <text:line-break/><text:soft-page-break/><text:span text:style-name="T1"> </text:span><text:span text:style-name="T2">(95/13) </text:span> ⲕ̣ⲁⲓⲅ̣[ⲁⲣ .....] ⲡⲓⲕⲟⲥⲙⲟⲥ <text:line-break/><text:span text:style-name="T1"> </text:span><text:span text:style-name="T2">(95/14) </text:span> ⲛ ⲉⲥ[ⲑⲏⲧⲟⲛ .. ⲙ] ⲡ̣[ⲣ]ⲏⲧⲉ <text:line-break/><text:span text:style-name="T1"> </text:span><text:span text:style-name="T2">(95/15) </text:span> ⲉ[ ]ⲛⲟⲩ <text:line-break/><text:span text:style-name="T1"> </text:span><text:span text:style-name="T2">(95/16) </text:span> ϩⲩⲡ[ⲁⲣⲝⲓⲥ ]ⲩ <text:line-break/><text:span text:style-name="T1"> </text:span><text:span text:style-name="T2">(95/17) </text:span> ⲅⲁⲣ ⲉⲩ[ <text:line-break/><text:span text:style-name="T1"> </text:span><text:span text:style-name="T2">(95/18) </text:span> ⲁⲩⲱ̣[ ].ⲁ̣ <text:line-break/><text:span text:style-name="T1"> </text:span><text:span text:style-name="T2">(95/19) </text:span> ⲛ .[ ]ⲉ <text:line-break/><text:span text:style-name="T1"> </text:span><text:span text:style-name="T2">(95/20) </text:span> (Lines 20 and following do not survive.) <text:line-break/><text:span text:style-name="T1"> </text:span><text:span text:style-name="T2">(96/1) </text:span> [ⲛ]ⲁ̣ϩⲱⲛ ⲉⲣⲟϥ ϩⲛ ⲟⲩⲥⲟⲟⲩⲛ <text:line-break/><text:span text:style-name="T1"> </text:span><text:span text:style-name="T2">(96/2) </text:span> ϣⲁϥϫⲓ ϭⲟⲙ· ⲁⲩⲱ ⲡⲏ ⲉⲧⲛⲉ‐ <text:line-break/><text:span text:style-name="T1"> </text:span><text:span text:style-name="T2">(96/3) </text:span> ⲟⲩⲉ ⲙⲙⲟϥ· ϣⲁϥⲑⲃⲃⲓⲟ· <text:line-break/><text:span text:style-name="T1"> </text:span><text:span text:style-name="T2">(96/4) </text:span> ⲁⲛⲟⲕ ⲇⲉ ⲡⲉϫⲁⲉⲓ̣ [ϫⲉ] ⲉⲧⲃⲉ ⲟ[ⲩ] <text:line-break/><text:span text:style-name="T1"> </text:span><text:span text:style-name="T2">(96/5) </text:span> ⲟⲩ̣ⲛ̣ ⲁⲩϣⲱⲡ[ⲉ ⲛϭⲓ] ⲛⲓⲣⲉϥϯ <text:line-break/><text:span text:style-name="T1"> </text:span><text:span text:style-name="T2">(96/6) </text:span> ϩⲁⲡ [ⲏ%0] ⲟⲩ ⲡⲉ ⲡⲓϫ[ⲓ ⲙ]ⲕⲁϩ ⲛⲧⲉ <text:line-break/><text:span text:style-name="T1"> </text:span><text:span text:style-name="T2">(96/7) </text:span> ⲡⲓ̣[.....] ⲛ ⲛⲉ[....].ⲉ ⲅⲁⲣ <text:line-break/><text:span text:style-name="T1"> </text:span><text:span text:style-name="T2">(96/8) </text:span> ⲛⲁ[.]ⲁ̣ [....]ϯ ⲙ[......].ⲙⲉ <text:line-break/><text:span text:style-name="T1"> </text:span><text:span text:style-name="T2">(96/9) </text:span> ⲁⲩⲱ [.....].ⲟ[.....]. ⲡⲉ <text:line-break/><text:span text:style-name="T1"> </text:span><text:span text:style-name="T2">(96/10) </text:span> ϫ[ <text:line-break/><text:span text:style-name="T1"> </text:span><text:span text:style-name="T2">(96/11) </text:span> ϣⲱ̣[ <text:line-break/><text:span text:style-name="T1"> </text:span><text:span text:style-name="T2">(96/12) </text:span> ⲁⲗⲗ[ⲁ <text:line-break/><text:span text:style-name="T1"> </text:span><text:span text:style-name="T2">(96/13) </text:span> ⲛⲥⲉ[ ]ⲧ’.[.. <text:line-break/><text:span text:style-name="T1"> </text:span><text:span text:style-name="T2">(96/14) </text:span> ⲉⲃⲟ̣ⲗ ϩⲓ[ⲧⲛ ] ⲉⲧ’ϩⲉ̣[ <text:line-break/><text:span text:style-name="T1"> </text:span><text:span text:style-name="T2">(96/15) </text:span> ⲡⲓϫⲓ̣ ⲙⲕ̣[ⲁϩ.......] ϩⲓⲧⲙ [ <text:line-break/><text:span text:style-name="T1"> </text:span><text:span text:style-name="T2">(96/16) </text:span> ⲡⲥⲟ̣[ ]ϥ̣ϯⲟ[ <text:line-break/><text:span text:style-name="T1"> </text:span><text:span text:style-name="T2">(96/17) </text:span> ⲛ .[ ]ϣⲟⲟⲡ’̣ <text:line-break/><text:span text:style-name="T1"> </text:span><text:span text:style-name="T2">(96/18) </text:span> ⲛ ⲥ̣[ ].ⲉⲥⲟⲩ‐ <text:line-break/><text:span text:style-name="T1"> </text:span><text:span text:style-name="T2">(96/19) </text:span> §ⲏϩ [ ]ⲱⲣϫ· <text:line-break/><text:span text:style-name="T1"> </text:span><text:span text:style-name="T2">(96/20) </text:span> §[ ]ⲡ’ [ <text:line-break/><text:span text:style-name="T1"> </text:span><text:span text:style-name="T2">(96/21) </text:span> [ ].ⲡ[ <text:line-break/><text:span text:style-name="T1"> </text:span><text:span text:style-name="T2">(96/22) </text:span> (Lines 22 and following do not survive.) <text:line-break/><text:span text:style-name="T1"> </text:span><text:span text:style-name="T2">(97/1) </text:span> [ϩ]ⲟⲟⲩⲧ’ ⲉⲩⲅⲛⲱ[ⲥⲓ]ⲥ ⲧ[ⲉ ⲛⲧ]ⲉ <text:line-break/><text:span text:style-name="T1"> </text:span><text:span text:style-name="T2">(97/2) </text:span> ⲡ̣ⲓϣⲙⲧ’ϭⲟⲙ ⲛⲛ ⲁⲧⲛⲁⲩ ⲉⲣⲟϥ <text:line-break/><text:span text:style-name="T1"> </text:span><text:span text:style-name="T2">(97/3) </text:span> [ⲛ] ⲛⲟϭ ⲙ ⲡ̅ⲛ̅ⲁ̅· ϯϩⲓⲕⲱⲛ ⲛ̣ⲧⲉ <text:line-break/><text:span text:style-name="T1"> </text:span><text:span text:style-name="T2">(97/4) </text:span> [ⲡⲓϣⲟⲣ]ⲡ’ ⲛ̣ ⲕ̅ⲗ̅ⲥ̅· ϯⲙⲛⲧ’ⲙⲁ‐ <text:line-break/><text:span text:style-name="T1"> </text:span><text:span text:style-name="T2">(97/5) </text:span> [ⲕⲁⲣⲓⲟⲥ ⲉⲧ]ϣⲟⲟⲡ’ ϩⲙ ⲡⲓⲁϩⲟ‐ <text:line-break/><text:span text:style-name="T1"> </text:span><text:span text:style-name="T2">(97/6) </text:span> [ⲣⲁⲧⲟⲛ ⲙ] ⲡ̅ⲛ̅ⲁ̅· ⲭⲱ̣[...] ϯⲁⲧ’ <text:line-break/><text:span text:style-name="T1"> </text:span><text:span text:style-name="T2">(97/7) </text:span> [.........].[......]ⲁ̣ⲧ’ <text:line-break/><text:span text:style-name="T1"> </text:span><text:span text:style-name="T2">(97/8) </text:span> [.........]ⲩⲱ̣[......] ⲅⲁⲣ <text:line-break/><text:span text:style-name="T1"> </text:span><text:span text:style-name="T2">(97/9) </text:span> [.......]ϩ.[......] ⲉϥⲉⲓⲙⲉ <text:line-break/><text:span text:style-name="T1"> </text:span><text:span text:style-name="T2">(97/10) </text:span> [ ]· <text:line-break/><text:span text:style-name="T1"> </text:span><text:span text:style-name="T2">(97/11) </text:span> [ ]ⲩ̣ⲉⲓⲧ’ <text:line-break/><text:span text:style-name="T1"> </text:span><text:span text:style-name="T2">(97/12) </text:span> [ ]ⲛ ⲁⲧ’ <text:line-break/><text:span text:style-name="T1"> </text:span><text:span text:style-name="T2">(97/13) </text:span> [ ]ⲙⲟⲩϩ <text:line-break/><text:span text:style-name="T1"> </text:span><text:span text:style-name="T2">(97/14) </text:span> [..]ⲛⲟ̣[ ] ⲉⲥⲟⲩ‐ <text:line-break/><text:span text:style-name="T1"> </text:span><text:span text:style-name="T2">(97/15) </text:span> ⲱ̣ⲛϩ ⲉ̣[ⲃⲟⲗ ]ⲅⲛⲱ‐ <text:line-break/><text:span text:style-name="T1"> </text:span><text:span text:style-name="T2">(97/16) </text:span> ⲥⲓⲥ ⲙ [ ]ⲥⲁϩⲉ‐ <text:line-break/><text:span text:style-name="T1"> </text:span><text:span text:style-name="T2">(97/17) </text:span> ⲣⲁ[ⲧ]ⲥ[ ].ⲥ <text:line-break/><text:soft-page-break/><text:span text:style-name="T1"> </text:span><text:span text:style-name="T2">(97/18) </text:span> ⲛ ⲛ[ ϩ]ⲙ <text:line-break/><text:span text:style-name="T1"> </text:span><text:span text:style-name="T2">(97/19) </text:span> [ ]· <text:line-break/><text:span text:style-name="T1"> </text:span><text:span text:style-name="T2">(97/20) </text:span> [ ]. ⲙ <text:line-break/><text:span text:style-name="T1"> </text:span><text:span text:style-name="T2">(97/21) </text:span> (Lines 21 and following do not survive.) <text:line-break/><text:span text:style-name="T1"> </text:span><text:span text:style-name="T2">(98/1) </text:span> [..] ⲟⲩ[ϩⲉ]ⲛⲛⲁⲥ ⲛ ⲧⲉⲗⲓⲟⲥ ⲛ̣‐ <text:line-break/><text:span text:style-name="T1"> </text:span><text:span text:style-name="T2">(98/2) </text:span> ⲧ̣ⲉ ⲟⲩ ϩ̣ⲉ̣ⲛⲛⲁⲥ ⲉⲥϫⲏⲕ· ⲁ[ⲩⲱ] <text:line-break/><text:span text:style-name="T1"> </text:span><text:span text:style-name="T2">(98/3) </text:span> [ⲉ]ⲧⲁⲥⲡⲱϣ ⲉ ⲡⲧⲏⲣϥ ⲉ̣ⲃ[ⲟⲗ] <text:line-break/><text:span text:style-name="T1"> </text:span><text:span text:style-name="T2">(98/4) </text:span> ϩⲓⲧ̣ⲛ [ⲡ]ⲧⲏ̣ⲣϥ· ⲉ̣[ <text:line-break/><text:span text:style-name="T1"> </text:span><text:span text:style-name="T2">(98/5) </text:span> ϩⲩⲡⲁⲣ̣ⲝⲓⲥ ⲙⲛ̣ [ <text:line-break/><text:span text:style-name="T1"> </text:span><text:span text:style-name="T2">(98/6) </text:span> ⲧⲉ [...] ⲛⲓⲙⲉⲉⲩ̣ⲉ̣ [ <text:line-break/><text:span text:style-name="T1"> </text:span><text:span text:style-name="T2">(98/7) </text:span> ⲡ[.......]..[ <text:line-break/><text:span text:style-name="T1"> </text:span><text:span text:style-name="T2">(98/8) </text:span> ⲟ[.......].ⲥ̣[ <text:line-break/><text:span text:style-name="T1"> </text:span><text:span text:style-name="T2">(98/9) </text:span> ⲉⲥⲑ̣[ⲏⲥⲓⲥ .]ⲡⲓⲛ[ <text:line-break/><text:span text:style-name="T1"> </text:span><text:span text:style-name="T2">(98/10) </text:span> ⲣ[ <text:line-break/><text:span text:style-name="T1"> </text:span><text:span text:style-name="T2">(98/11) </text:span> ⲙ [ <text:line-break/><text:span text:style-name="T1"> </text:span><text:span text:style-name="T2">(98/12) </text:span> ϩⲓ[ <text:line-break/><text:span text:style-name="T1"> </text:span><text:span text:style-name="T2">(98/13) </text:span> ⲛ .[ <text:line-break/><text:span text:style-name="T1"> </text:span><text:span text:style-name="T2">(98/14) </text:span> ⲟⲥ̣[ ]ⲣⲟ <text:line-break/><text:span text:style-name="T1"> </text:span><text:span text:style-name="T2">(98/15) </text:span> ⲉⲓ̣[ ]ⲧⲙⲙ[ <text:line-break/><text:span text:style-name="T1"> </text:span><text:span text:style-name="T2">(98/16) </text:span> ⲁ[ ].ⲓ.ⲉ <text:line-break/><text:span text:style-name="T1"> </text:span><text:span text:style-name="T2">(98/17) </text:span> ⲉⲗ[ ]ⲉ ⲛ <text:line-break/><text:span text:style-name="T1"> </text:span><text:span text:style-name="T2">(98/18) </text:span> ϩ[ ]. <text:line-break/><text:span text:style-name="T1"> </text:span><text:span text:style-name="T2">(98/19) </text:span> ⲡ[ <text:line-break/><text:span text:style-name="T1"> </text:span><text:span text:style-name="T2">(98/20) </text:span> .[ <text:line-break/><text:span text:style-name="T1"> </text:span><text:span text:style-name="T2">(98/21) </text:span> .[ <text:line-break/><text:span text:style-name="T1"> </text:span><text:span text:style-name="T2">(98/22) </text:span> (Lines 22 and following do not survive.) <text:line-break/><text:span text:style-name="T1"> </text:span><text:span text:style-name="T2">(99/1) </text:span> [.....]ⲥⲉⲥⲁ.[ ] <text:line-break/><text:span text:style-name="T1"> </text:span><text:span text:style-name="T2">(99/2) </text:span> [.ϩⲩⲡⲁ]ⲣ̣ⲝⲓⲥ ⲙ[..........]ⲧ’ <text:line-break/><text:span text:style-name="T1"> </text:span><text:span text:style-name="T2">(99/3) </text:span> [......] ϩ̣ⲙ [.]ⲉ̣[ ]ⲉ̣ⲧ’ <text:line-break/><text:span text:style-name="T1"> </text:span><text:span text:style-name="T2">(99/4) </text:span> [ ]ⲩⲧ’ <text:line-break/><text:span text:style-name="T1"> </text:span><text:span text:style-name="T2">(99/5) </text:span> [ ⲉ]ⲓ̣ⲙⲉ <text:line-break/><text:span text:style-name="T1"> </text:span><text:span text:style-name="T2">(99/6) </text:span> [ ]ⲟϥ· <text:line-break/><text:span text:style-name="T1"> </text:span><text:span text:style-name="T2">(99/7) </text:span> [ ]ⲟⲛ <text:line-break/><text:span text:style-name="T1"> </text:span><text:span text:style-name="T2">(99/8) </text:span> [ ]ⲁⲣ <text:line-break/><text:span text:style-name="T1"> </text:span><text:span text:style-name="T2">(99/9) </text:span> [ ]ⲥ̣ⲥⲙⲟⲩ <text:line-break/><text:span text:style-name="T1"> </text:span><text:span text:style-name="T2">(99/10) </text:span> [ ]ⲁ <text:line-break/><text:span text:style-name="T1"> </text:span><text:span text:style-name="T2">(99/11) </text:span> [ ].ⲡ’ ⲛ <text:line-break/><text:span text:style-name="T1"> </text:span><text:span text:style-name="T2">(99/12) </text:span> [ ]ϫⲛ <text:line-break/><text:span text:style-name="T1"> </text:span><text:span text:style-name="T2">(99/13) </text:span> [ ].ⲁ̅ ⲛ <text:line-break/><text:span text:style-name="T1"> </text:span><text:span text:style-name="T2">(99/14) </text:span> [ ]ⲉⲧ’ <text:line-break/><text:span text:style-name="T1"> </text:span><text:span text:style-name="T2">(99/15) </text:span> [ ].ⲟⲩ <text:line-break/><text:span text:style-name="T1"> </text:span><text:span text:style-name="T2">(99/16) </text:span> [ ] ⲁ̣ⲩⲱ <text:line-break/><text:span text:style-name="T1"> </text:span><text:span text:style-name="T2">(99/17) </text:span> [ ]ⲁ <text:line-break/><text:span text:style-name="T1"> </text:span><text:span text:style-name="T2">(99/18) </text:span> [ ]ⲉ <text:line-break/><text:span text:style-name="T1"> </text:span><text:span text:style-name="T2">(99/19) </text:span> [ ]ⲧ’ <text:line-break/><text:span text:style-name="T1"> </text:span><text:span text:style-name="T2">(99/20) </text:span> [ ]ⲟ <text:line-break/><text:span text:style-name="T1"> </text:span><text:span text:style-name="T2">(99/21) </text:span> (Lines 21 and following do not survive.) <text:line-break/><text:soft-page-break/><text:span text:style-name="T1"> </text:span><text:span text:style-name="T2">(100/1) </text:span> ⲧ[.......]ϣⲟⲙ[.... <text:line-break/><text:span text:style-name="T1"> </text:span><text:span text:style-name="T2">(100/2) </text:span> ⲟ̣[.......]ⲉⲧⲉ[..... <text:line-break/><text:span text:style-name="T1"> </text:span><text:span text:style-name="T2">(100/3) </text:span> .[.......]ⲙ[.]ⲥ[.... <text:line-break/><text:span text:style-name="T1"> </text:span><text:span text:style-name="T2">(100/4) </text:span> ⲧⲉ.[ <text:line-break/><text:span text:style-name="T1"> </text:span><text:span text:style-name="T2">(100/5) </text:span> ⲛ ⲧ[ <text:line-break/><text:span text:style-name="T1"> </text:span><text:span text:style-name="T2">(100/6) </text:span> ⲁ̅ⲣ̅ⲙ̅[̅ⲟ̅ⲍ̅ⲏ̅ⲗ̅ <text:line-break/><text:span text:style-name="T1"> </text:span><text:span text:style-name="T2">(100/7) </text:span> ⲛⲥ̣[ <text:line-break/><text:span text:style-name="T1"> </text:span><text:span text:style-name="T2">(100/8) </text:span> ⲥⲓⲥ[ <text:line-break/><text:span text:style-name="T1"> </text:span><text:span text:style-name="T2">(100/9) </text:span> ⲡⲉ ϯⲃ.[ <text:line-break/><text:span text:style-name="T1"> </text:span><text:span text:style-name="T2">(100/10) </text:span> ϩⲓⲧ̣[ⲛ <text:line-break/><text:span text:style-name="T1"> </text:span><text:span text:style-name="T2">(100/11) </text:span> ϭⲟⲙ [ <text:line-break/><text:span text:style-name="T1"> </text:span><text:span text:style-name="T2">(100/12) </text:span> ⲣⲡ’ .[ <text:line-break/><text:span text:style-name="T1"> </text:span><text:span text:style-name="T2">(100/13) </text:span> ⲛ ⲥⲉ̣[ <text:line-break/><text:span text:style-name="T1"> </text:span><text:span text:style-name="T2">(100/14) </text:span> ϣⲱ[ <text:line-break/><text:span text:style-name="T1"> </text:span><text:span text:style-name="T2">(100/15) </text:span> ⲉⲧ[ <text:line-break/><text:span text:style-name="T1"> </text:span><text:span text:style-name="T2">(100/16) </text:span> ⲉⲃⲟ̣[ⲗ <text:line-break/><text:span text:style-name="T1"> </text:span><text:span text:style-name="T2">(100/17) </text:span> ⲉ[ <text:line-break/><text:span text:style-name="T1"> </text:span><text:span text:style-name="T2">(100/18) </text:span> ⲧⲟ̣[ <text:line-break/><text:span text:style-name="T1"> </text:span><text:span text:style-name="T2">(100/19) </text:span> ⲣⲡ [ <text:line-break/><text:span text:style-name="T1"> </text:span><text:span text:style-name="T2">(100/20) </text:span> ⲛ [ <text:line-break/><text:span text:style-name="T1"> </text:span><text:span text:style-name="T2">(100/21) </text:span> .[ <text:line-break/><text:span text:style-name="T1"> </text:span><text:span text:style-name="T2">(100/22) </text:span> (Lines 22 and following do not survive.) <text:line-break/><text:span text:style-name="T1"> </text:span><text:span text:style-name="T2">(101/1) </text:span> [.....].ⲁⲧⲛⲁⲩ ⲉ[ⲣⲟϥ.... <text:line-break/><text:span text:style-name="T1"> </text:span><text:span text:style-name="T2">(101/2) </text:span> [......].ⲩⲉ ⲡⲏ ⲉ̣[....... <text:line-break/><text:span text:style-name="T1"> </text:span><text:span text:style-name="T2">(101/3) </text:span> [.... ⲡ]ⲁ̣ⲓ̈ ⲡⲉ ⲡ̣ⲉⲥⲉ̣[.....]ⲧ’ <text:line-break/><text:span text:style-name="T1"> </text:span><text:span text:style-name="T2">(101/4) </text:span> [ ]ϫⲛ [...]ⲛⲱ‐ <text:line-break/><text:span text:style-name="T1"> </text:span><text:span text:style-name="T2">(101/5) </text:span> [ ]ⲙ̣ⲟⲟ̣[...]ⲉⲓⲇⲟⲥ <text:line-break/><text:span text:style-name="T1"> </text:span><text:span text:style-name="T2">(101/6) </text:span> [ ]ⲟⲛ <text:line-break/><text:span text:style-name="T1"> </text:span><text:span text:style-name="T2">(101/7) </text:span> [ ]ⲉⲥϩⲩ‐ <text:line-break/><text:span text:style-name="T1"> </text:span><text:span text:style-name="T2">(101/8) </text:span> [ ].ⲛ̅ ⲟⲩ‐ <text:line-break/><text:span text:style-name="T1"> </text:span><text:span text:style-name="T2">(101/9) </text:span> [ ]ⲁⲧ’‐ <text:line-break/><text:span text:style-name="T1"> </text:span><text:span text:style-name="T2">(101/10) </text:span> [ ]ⲥ ⲛ <text:line-break/><text:span text:style-name="T1"> </text:span><text:span text:style-name="T2">(101/11) </text:span> [ ]ϣⲉ <text:line-break/><text:span text:style-name="T1"> </text:span><text:span text:style-name="T2">(101/12) </text:span> [ ]ⲡ̣ⲓⲕ̅ⲗ̅ⲥ̅ <text:line-break/><text:span text:style-name="T1"> </text:span><text:span text:style-name="T2">(101/13) </text:span> [ ⲁ]ⲧ’ⲡⲱϣ <text:line-break/><text:span text:style-name="T1"> </text:span><text:span text:style-name="T2">(101/14) </text:span> [ ]ⲟϥ <text:line-break/><text:span text:style-name="T1"> </text:span><text:span text:style-name="T2">(101/15) </text:span> [ ].ⲉⲓ <text:line-break/><text:span text:style-name="T1"> </text:span><text:span text:style-name="T2">(101/16) </text:span> [ ].ⲉ <text:line-break/><text:span text:style-name="T1"> </text:span><text:span text:style-name="T2">(101/17) </text:span> [ ⲉⲛ]ⲛ̣ⲟⲓⲁ <text:line-break/><text:span text:style-name="T1"> </text:span><text:span text:style-name="T2">(101/18) </text:span> [ ]ⲉ <text:line-break/><text:span text:style-name="T1"> </text:span><text:span text:style-name="T2">(101/19) </text:span> [ ]ⲟⲉ <text:line-break/><text:span text:style-name="T1"> </text:span><text:span text:style-name="T2">(101/20) </text:span> (Lines 20 and following do not survive.) <text:line-break/><text:span text:style-name="T1"> </text:span><text:span text:style-name="T2">(102/1) </text:span> ⲡ̣[..... ⲉ]ⲧ’ϣⲟⲟⲡ’ [..... <text:line-break/><text:span text:style-name="T1"> </text:span><text:span text:style-name="T2">(102/2) </text:span> ⲡ̣[.......] ⲡⲓⲕⲉⲟ.[..... <text:line-break/><text:span text:style-name="T1"> </text:span><text:span text:style-name="T2">(102/3) </text:span> ⲟ̣[.....]ⲓ̣ⲱⲧ’ ⲟ̣ⲩϫ̣[..... <text:line-break/><text:span text:style-name="T1"> </text:span><text:span text:style-name="T2">(102/4) </text:span> ⲙⲛ [...]ⲛⲧ̣[ <text:line-break/><text:span text:style-name="T1"> </text:span><text:span text:style-name="T2">(102/5) </text:span> ⲣϥ ⲛ [...]ⲇⲟ[ <text:line-break/><text:soft-page-break/><text:span text:style-name="T1"> </text:span><text:span text:style-name="T2">(102/6) </text:span> ⲛ ⲟ[....].[ <text:line-break/><text:span text:style-name="T1"> </text:span><text:span text:style-name="T2">(102/7) </text:span> ⲟⲩⲇ̣[ <text:line-break/><text:span text:style-name="T1"> </text:span><text:span text:style-name="T2">(102/8) </text:span> ⲟⲩⲱ[ <text:line-break/><text:span text:style-name="T1"> </text:span><text:span text:style-name="T2">(102/9) </text:span> ⲉϥ[.]ⲧ̣[ <text:line-break/><text:span text:style-name="T1"> </text:span><text:span text:style-name="T2">(102/10) </text:span> ⲥⲉ[ <text:line-break/><text:span text:style-name="T1"> </text:span><text:span text:style-name="T2">(102/11) </text:span> ⲛⲁ[ <text:line-break/><text:span text:style-name="T1"> </text:span><text:span text:style-name="T2">(102/12) </text:span> ⲛⲱ[ <text:line-break/><text:span text:style-name="T1"> </text:span><text:span text:style-name="T2">(102/13) </text:span> ⲁⲩⲱ̣ [ <text:line-break/><text:span text:style-name="T1"> </text:span><text:span text:style-name="T2">(102/14) </text:span> ⲛⲏ[ <text:line-break/><text:span text:style-name="T1"> </text:span><text:span text:style-name="T2">(102/15) </text:span> ⲟⲩ[ <text:line-break/><text:span text:style-name="T1"> </text:span><text:span text:style-name="T2">(102/16) </text:span> ⲙ ⲙ[ <text:line-break/><text:span text:style-name="T1"> </text:span><text:span text:style-name="T2">(102/17) </text:span> ⲱ̣[ <text:line-break/><text:span text:style-name="T1"> </text:span><text:span text:style-name="T2">(102/18) </text:span> ⲉ[ <text:line-break/><text:span text:style-name="T1"> </text:span><text:span text:style-name="T2">(102/19) </text:span> ϩⲉⲛ̣[ <text:line-break/><text:span text:style-name="T1"> </text:span><text:span text:style-name="T2">(102/20) </text:span> ⲡ̣[ <text:line-break/><text:span text:style-name="T1"> </text:span><text:span text:style-name="T2">(102/21) </text:span> ⲙ [ <text:line-break/><text:span text:style-name="T1"> </text:span><text:span text:style-name="T2">(102/22) </text:span> (Lines 22 and following do not survive.) <text:line-break/><text:span text:style-name="T1"> </text:span><text:span text:style-name="T2">(103/1) </text:span> [.]ⲉⲛⲁⲣ̣ⲭⲏ ⲛ ⲧ̣[......... <text:line-break/><text:span text:style-name="T1"> </text:span><text:span text:style-name="T2">(103/2) </text:span> [..]ⲧ’̣ϣ̣ⲟ̣ⲟⲡ’ ⲟⲛ̣[ⲧⲱⲥ...]ⲉ <text:line-break/><text:span text:style-name="T1"> </text:span><text:span text:style-name="T2">(103/3) </text:span> [.]ⲧ’̣ϣ̣ⲟ̣ⲟⲡ’̣ [......ⲟⲩ]ⲥⲓⲁ <text:line-break/><text:span text:style-name="T1"> </text:span><text:span text:style-name="T2">(103/4) </text:span> [ ]ⲁ̣ⲓ̈ ϩⲙ <text:line-break/><text:span text:style-name="T1"> </text:span><text:span text:style-name="T2">(103/5) </text:span> [ ⲡⲁ]ⲓ̈ ⲡⲉ· <text:line-break/><text:span text:style-name="T1"> </text:span><text:span text:style-name="T2">(103/6) </text:span> [ ] ϯⲙⲛⲧ’‐ <text:line-break/><text:span text:style-name="T1"> </text:span><text:span text:style-name="T2">(103/7) </text:span> [ ]ⲉ̣ⲟⲩ‐ <text:line-break/><text:span text:style-name="T1"> </text:span><text:span text:style-name="T2">(103/8) </text:span> [ ]ⲟ̣ⲟⲩ <text:line-break/><text:span text:style-name="T1"> </text:span><text:span text:style-name="T2">(103/9) </text:span> [ ]ⲁⲥ <text:line-break/><text:span text:style-name="T1"> </text:span><text:span text:style-name="T2">(103/10) </text:span> [ ]ⲧ̣ⲟⲩ <text:line-break/><text:span text:style-name="T1"> </text:span><text:span text:style-name="T2">(103/11) </text:span> [ ⲉⲃ]ⲟⲗ <text:line-break/><text:span text:style-name="T1"> </text:span><text:span text:style-name="T2">(103/12) </text:span> [ ] ϣⲁⲩ‐ <text:line-break/><text:span text:style-name="T1"> </text:span><text:span text:style-name="T2">(103/13) </text:span> [ ]ⲁⲓ̈ ⲁⲛ <text:line-break/><text:span text:style-name="T1"> </text:span><text:span text:style-name="T2">(103/14) </text:span> [ ]ⲉⲧⲟⲩ <text:line-break/><text:span text:style-name="T1"> </text:span><text:span text:style-name="T2">(103/15) </text:span> [ ] ⲡ̣ⲁⲓ̈ <text:line-break/><text:span text:style-name="T1"> </text:span><text:span text:style-name="T2">(103/16) </text:span> [ ]ⲣ <text:line-break/><text:span text:style-name="T1"> </text:span><text:span text:style-name="T2">(103/17) </text:span> [ ]ⲗ <text:line-break/><text:span text:style-name="T1"> </text:span><text:span text:style-name="T2">(103/18) </text:span> [ ] <text:line-break/><text:span text:style-name="T1"> </text:span><text:span text:style-name="T2">(103/19) </text:span> [ ] ⲙⲛ <text:line-break/><text:span text:style-name="T1"> </text:span><text:span text:style-name="T2">(103/20) </text:span> (Lines 20 and following do not survive.) <text:line-break/><text:span text:style-name="T1"> </text:span><text:span text:style-name="T2">(104/1) </text:span> ⲙ [.........] ⲉⲥⲟⲩⲱⲛϩ ⲉ̣[ⲃⲟⲗ] <text:line-break/><text:span text:style-name="T1"> </text:span><text:span text:style-name="T2">(104/2) </text:span> ⲙ [.........] ⲛⲧⲉ̣ ⲛⲏ̣ ⲉⲧⲟ̣[... <text:line-break/><text:span text:style-name="T1"> </text:span><text:span text:style-name="T2">(104/3) </text:span> ⲏⲉ̣[.......].ⲁⲓ̈ [.]ⲏ ⲛ̣ⲧ̣ⲉ ⲡⲓ[.... <text:line-break/><text:span text:style-name="T1"> </text:span><text:span text:style-name="T2">(104/4) </text:span> ⲁⲩⲱ̣ [ <text:line-break/><text:span text:style-name="T1"> </text:span><text:span text:style-name="T2">(104/5) </text:span> ⲡⲁⲓ̈ ⲁ.[ <text:line-break/><text:span text:style-name="T1"> </text:span><text:span text:style-name="T2">(104/6) </text:span> ⲡⲓⲛⲟ.[ <text:line-break/><text:span text:style-name="T1"> </text:span><text:span text:style-name="T2">(104/7) </text:span> ⲉⲧⲟ̣[ <text:line-break/><text:span text:style-name="T1"> </text:span><text:span text:style-name="T2">(104/8) </text:span> ⲛⲁⲩ[ <text:line-break/><text:span text:style-name="T1"> </text:span><text:span text:style-name="T2">(104/9) </text:span> ⲛⲉ ⲡⲁ.[ <text:line-break/><text:span text:style-name="T1"> </text:span><text:span text:style-name="T2">(104/10) </text:span> ⲏⲣ[ <text:line-break/><text:soft-page-break/><text:span text:style-name="T1"> </text:span><text:span text:style-name="T2">(104/11) </text:span> ⲁⲧ’.[ <text:line-break/><text:span text:style-name="T1"> </text:span><text:span text:style-name="T2">(104/12) </text:span> ⲃⲟⲗ ⲙ [ <text:line-break/><text:span text:style-name="T1"> </text:span><text:span text:style-name="T2">(104/13) </text:span> ⲙⲙⲟ[ <text:line-break/><text:span text:style-name="T1"> </text:span><text:span text:style-name="T2">(104/14) </text:span> ⲁϥϣ[ <text:line-break/><text:span text:style-name="T1"> </text:span><text:span text:style-name="T2">(104/15) </text:span> ⲟⲛⲧⲱ̣[ⲥ <text:line-break/><text:span text:style-name="T1"> </text:span><text:span text:style-name="T2">(104/16) </text:span> ϣⲏ[ <text:line-break/><text:span text:style-name="T1"> </text:span><text:span text:style-name="T2">(104/17) </text:span> ⲡⲏ ⲉ[ <text:line-break/><text:span text:style-name="T1"> </text:span><text:span text:style-name="T2">(104/18) </text:span> ⲇⲉ [ <text:line-break/><text:span text:style-name="T1"> </text:span><text:span text:style-name="T2">(104/19) </text:span> ⲧ.[ <text:line-break/><text:span text:style-name="T1"> </text:span><text:span text:style-name="T2">(104/20) </text:span> ⲛϩⲣ̣[ⲁⲓ̈ <text:line-break/><text:span text:style-name="T1"> </text:span><text:span text:style-name="T2">(104/21) </text:span> ⲡⲓ̣.[ <text:line-break/><text:span text:style-name="T1"> </text:span><text:span text:style-name="T2">(104/22) </text:span> ⲣ[ <text:line-break/><text:span text:style-name="T1"> </text:span><text:span text:style-name="T2">(104/23) </text:span> ⲡ[ <text:line-break/><text:span text:style-name="T1"> </text:span><text:span text:style-name="T2">(104/24) </text:span> (Lines 24 and following do not survive.) <text:line-break/><text:span text:style-name="T1"> </text:span><text:span text:style-name="T2">(105/1) </text:span> ⲛⲉ ⲛⲏ ⲉⲧⲁϩⲉ̣[ⲣⲁⲧⲟⲩ....] ⲙ <text:line-break/><text:span text:style-name="T1"> </text:span><text:span text:style-name="T2">(105/2) </text:span> ⲡ̣ⲓⲉⲱⲛ ⲙ ⲙ[.........] ⲛ̣‐ <text:line-break/><text:span text:style-name="T1"> </text:span><text:span text:style-name="T2">(105/3) </text:span> ⲛ̣ⲏⲩ ⲉϩⲣⲁⲓ̈ ⲛ̣ ⲟ̣[........]ⲉ <text:line-break/><text:span text:style-name="T1"> </text:span><text:span text:style-name="T2">(105/4) </text:span> [...]ⲱⲧⲡ [.........] ⲉⲧ’ <text:line-break/><text:span text:style-name="T1"> </text:span><text:span text:style-name="T2">(105/5) </text:span> ϣⲟⲟⲡ’ ϩⲙ̣ [........]. ⲡⲏ <text:line-break/><text:span text:style-name="T1"> </text:span><text:span text:style-name="T2">(105/6) </text:span> ⲙⲉⲛ ⲉ̣[ ].ⲏⲣ <text:line-break/><text:span text:style-name="T1"> </text:span><text:span text:style-name="T2">(105/7) </text:span> [ ] ⲡⲏ <text:line-break/><text:span text:style-name="T1"> </text:span><text:span text:style-name="T2">(105/8) </text:span> [ ]ⲉ ⲟⲩⲁ <text:line-break/><text:span text:style-name="T1"> </text:span><text:span text:style-name="T2">(105/9) </text:span> [ ⲟ]ⲩⲁⲣⲭ̣ⲏ <text:line-break/><text:span text:style-name="T1"> </text:span><text:span text:style-name="T2">(105/10) </text:span> [ ]ⲟⲩⲧ’ <text:line-break/><text:span text:style-name="T1"> </text:span><text:span text:style-name="T2">(105/11) </text:span> [ ] ⲙⲛ <text:line-break/><text:span text:style-name="T1"> </text:span><text:span text:style-name="T2">(105/12) </text:span> [ ]ⲁ̣· ⲡⲁⲓ̈ <text:line-break/><text:span text:style-name="T1"> </text:span><text:span text:style-name="T2">(105/13) </text:span> [ ϩ]ⲩⲗⲏ <text:line-break/><text:span text:style-name="T1"> </text:span><text:span text:style-name="T2">(105/14) </text:span> [ ]ⲟ̣ⲩⲱⲧ’ <text:line-break/><text:span text:style-name="T1"> </text:span><text:span text:style-name="T2">(105/15) </text:span> [ ]ⲟⲩ ⲛ <text:line-break/><text:span text:style-name="T1"> </text:span><text:span text:style-name="T2">(105/16) </text:span> [ ϣⲟ]ⲟⲡ’ <text:line-break/><text:span text:style-name="T1"> </text:span><text:span text:style-name="T2">(105/17) </text:span> [ ]ⲁ <text:line-break/><text:span text:style-name="T1"> </text:span><text:span text:style-name="T2">(105/18) </text:span> [ ]ⲩ <text:line-break/><text:span text:style-name="T1"> </text:span><text:span text:style-name="T2">(105/19) </text:span> [ ]ⲉⲧ’ <text:line-break/><text:span text:style-name="T1"> </text:span><text:span text:style-name="T2">(105/20) </text:span> [ ] ⲙⲛ <text:line-break/><text:span text:style-name="T1"> </text:span><text:span text:style-name="T2">(105/21) </text:span> [ ]ⲁ̣ <text:line-break/><text:span text:style-name="T1"> </text:span><text:span text:style-name="T2">(105/22) </text:span> (Lines 22 and following do not survive.) <text:line-break/><text:span text:style-name="T1"> </text:span><text:span text:style-name="T2">(106/1) </text:span> ⲡ[.........] ⲁ̣ⲩⲱ ⲉϥϣⲟⲟ[ⲡ’ <text:line-break/><text:span text:style-name="T1"> </text:span><text:span text:style-name="T2">(106/2) </text:span> ⲉ[..........] ⲡⲉ ⲁⲩⲱ ⲛ ⲁ[ <text:line-break/><text:span text:style-name="T1"> </text:span><text:span text:style-name="T2">(106/3) </text:span> ⲡ[.........] ϣⲱⲗϩ ⲛⲧⲉ ⲟⲩ̣[ <text:line-break/><text:span text:style-name="T1"> </text:span><text:span text:style-name="T2">(106/4) </text:span> ⲧⲛⲟ[.........] ⲛ ⲟⲩⲁⲣ[ <text:line-break/><text:span text:style-name="T1"> </text:span><text:span text:style-name="T2">(106/5) </text:span> ⲁⲩ[........ ⲟ]ⲩⲇⲉ ⲛⲧⲉ ⲛ[ <text:line-break/><text:span text:style-name="T1"> </text:span><text:span text:style-name="T2">(106/6) </text:span> ⲙⲉϩ[ ]ⲉ ⲡⲏ ⲡ[ <text:line-break/><text:span text:style-name="T1"> </text:span><text:span text:style-name="T2">(106/7) </text:span> ⲉⲧⲟ̣[ ].[ <text:line-break/><text:span text:style-name="T1"> </text:span><text:span text:style-name="T2">(106/8) </text:span> ⲕⲟⲟ[ <text:line-break/><text:span text:style-name="T1"> </text:span><text:span text:style-name="T2">(106/9) </text:span> ⲡⲟⲩⲉ[ <text:line-break/><text:span text:style-name="T1"> </text:span><text:span text:style-name="T2">(106/10) </text:span> ⲙⲛ [ <text:line-break/><text:span text:style-name="T1"> </text:span><text:span text:style-name="T2">(106/11) </text:span> ⲧⲉ.[ <text:line-break/><text:soft-page-break/><text:span text:style-name="T1"> </text:span><text:span text:style-name="T2">(106/12) </text:span> ⲏⲡⲉ̣[ <text:line-break/><text:span text:style-name="T1"> </text:span><text:span text:style-name="T2">(106/13) </text:span> ⲱⲛϩ [ <text:line-break/><text:span text:style-name="T1"> </text:span><text:span text:style-name="T2">(106/14) </text:span> ⲕⲁⲧ[ⲁ <text:line-break/><text:span text:style-name="T1"> </text:span><text:span text:style-name="T2">(106/15) </text:span> ⲉⲧⲉ[ <text:line-break/><text:span text:style-name="T1"> </text:span><text:span text:style-name="T2">(106/16) </text:span> ⲣⲟⲩ[ <text:line-break/><text:span text:style-name="T1"> </text:span><text:span text:style-name="T2">(106/17) </text:span> ⲁⲩ[ <text:line-break/><text:span text:style-name="T1"> </text:span><text:span text:style-name="T2">(106/18) </text:span> ⲡⲁ[ <text:line-break/><text:span text:style-name="T1"> </text:span><text:span text:style-name="T2">(106/19) </text:span> ⲉⲁ[ <text:line-break/><text:span text:style-name="T1"> </text:span><text:span text:style-name="T2">(106/20) </text:span> ⲉⲧ[ <text:line-break/><text:span text:style-name="T1"> </text:span><text:span text:style-name="T2">(106/21) </text:span> ⲁ[ <text:line-break/><text:span text:style-name="T1"> </text:span><text:span text:style-name="T2">(106/22) </text:span> ⲩ̣[ <text:line-break/><text:span text:style-name="T1"> </text:span><text:span text:style-name="T2">(106/23) </text:span> (Lines 23 and following do not survive.) <text:line-break/><text:span text:style-name="T1"> </text:span><text:span text:style-name="T2">(107/1) </text:span> ⲙⲙⲟⲟⲩ ⲛϩⲣ[ⲁⲓ̈]......]ⲥ̣ <text:line-break/><text:span text:style-name="T1"> </text:span><text:span text:style-name="T2">(107/2) </text:span> [.]ⲁ̣ⲥⲓⲥ· ⲁⲩⲱ .[........]ⲉ̣ <text:line-break/><text:span text:style-name="T1"> </text:span><text:span text:style-name="T2">(107/3) </text:span> [ϩ]ⲩⲡⲁⲣⲝⲓⲥ̣ [........].ⲓ̣ⲥ <text:line-break/><text:span text:style-name="T1"> </text:span><text:span text:style-name="T2">(107/4) </text:span> .[.]ⲱ ⲙⲛ ⲡ[.....ϣ]ⲟ̣ⲟⲡ’ <text:line-break/><text:span text:style-name="T1"> </text:span><text:span text:style-name="T2">(107/5) </text:span> ⲙ ⲡⲣⲏⲧⲉ̣ [........]ⲟⲩ <text:line-break/><text:span text:style-name="T1"> </text:span><text:span text:style-name="T2">(107/6) </text:span> ⲉⲓⲇ[ⲱⲗⲟⲛ ϣ]ⲟⲣⲡ’ <text:line-break/><text:span text:style-name="T1"> </text:span><text:span text:style-name="T2">(107/7) </text:span> [ ]ⲙ <text:line-break/><text:span text:style-name="T1"> </text:span><text:span text:style-name="T2">(107/8) </text:span> [ ϣ]ⲟ̣ⲣⲡ’ <text:line-break/><text:span text:style-name="T1"> </text:span><text:span text:style-name="T2">(107/9) </text:span> [ ] ⲛⲧⲉ ⲛⲓ‐ <text:line-break/><text:span text:style-name="T1"> </text:span><text:span text:style-name="T2">(107/10) </text:span> [ ]ⲁ <text:line-break/><text:span text:style-name="T1"> </text:span><text:span text:style-name="T2">(107/11) </text:span> [ ]ⲛ ⲛ <text:line-break/><text:span text:style-name="T1"> </text:span><text:span text:style-name="T2">(107/12) </text:span> [ ] ⲡⲁⲓ̈ <text:line-break/><text:span text:style-name="T1"> </text:span><text:span text:style-name="T2">(107/13) </text:span> [ ].ⲁ <text:line-break/><text:span text:style-name="T1"> </text:span><text:span text:style-name="T2">(107/14) </text:span> [ ] ϣⲟⲙ‐ <text:line-break/><text:span text:style-name="T1"> </text:span><text:span text:style-name="T2">(107/15) </text:span> [ ]ⲟⲩ <text:line-break/><text:span text:style-name="T1"> </text:span><text:span text:style-name="T2">(107/16) </text:span> [ ] <text:line-break/><text:span text:style-name="T1"> </text:span><text:span text:style-name="T2">(107/17) </text:span> [ ]ⲁ̣ ⲛ <text:line-break/><text:span text:style-name="T1"> </text:span><text:span text:style-name="T2">(107/18) </text:span> [ ]ⲁ̣ⲓ̈ <text:line-break/><text:span text:style-name="T1"> </text:span><text:span text:style-name="T2">(107/19) </text:span> [ ]ⲉ̣ⲓ̈ <text:line-break/><text:span text:style-name="T1"> </text:span><text:span text:style-name="T2">(107/20) </text:span> [ ]. <text:line-break/><text:span text:style-name="T1"> </text:span><text:span text:style-name="T2">(107/21) </text:span> [ ⲟ]ⲩⲁ· <text:line-break/><text:span text:style-name="T1"> </text:span><text:span text:style-name="T2">(107/22) </text:span> (Lines 22 and following do not survive.) <text:line-break/><text:span text:style-name="T1"> </text:span><text:span text:style-name="T2">(108/1) </text:span> ⲁ[.........]ⲛⲉ ⲁⲛ ⲉⲩϯ ⲛⲁ̣[. <text:line-break/><text:span text:style-name="T1"> </text:span><text:span text:style-name="T2">(108/2) </text:span> ϩⲙ̣ [.......] ⲡⲏ ⲉⲧ’ϣⲟⲟⲡ’̣ [ <text:line-break/><text:span text:style-name="T1"> </text:span><text:span text:style-name="T2">(108/3) </text:span> ⲉⲃ[ⲟⲗ .......] ⲧ̣ⲏⲣⲟⲩ ⲙⲛ̣ <text:line-break/><text:span text:style-name="T1"> </text:span><text:span text:style-name="T2">(108/4) </text:span> ⲡⲏ ⲉ[.........] ⲟ̣ⲩⲙⲏⲏ̣ϣ̣[ⲉ <text:line-break/><text:span text:style-name="T1"> </text:span><text:span text:style-name="T2">(108/5) </text:span> ⲛ ⲥⲭⲏ̣[..........]ⲧ̣ⲁⲙⲓⲟ ⲏ [. <text:line-break/><text:span text:style-name="T1"> </text:span><text:span text:style-name="T2">(108/6) </text:span> ⲧⲁⲡ[ ].[.. <text:line-break/><text:span text:style-name="T1"> </text:span><text:span text:style-name="T2">(108/7) </text:span> ⲁⲩⲱ [ <text:line-break/><text:span text:style-name="T1"> </text:span><text:span text:style-name="T2">(108/8) </text:span> ⲉⲃⲟⲗ [ <text:line-break/><text:span text:style-name="T1"> </text:span><text:span text:style-name="T2">(108/9) </text:span> ⲧⲁⲝⲓⲥ ⲙ̣[ <text:line-break/><text:span text:style-name="T1"> </text:span><text:span text:style-name="T2">(108/10) </text:span> ⲡⲓⲁ[ⲧ’ <text:line-break/><text:span text:style-name="T1"> </text:span><text:span text:style-name="T2">(108/11) </text:span> ϣⲟⲙ[ <text:line-break/><text:span text:style-name="T1"> </text:span><text:span text:style-name="T2">(108/12) </text:span> ϩⲙ ⲡⲓ̣[ <text:line-break/><text:span text:style-name="T1"> </text:span><text:span text:style-name="T2">(108/13) </text:span> ⲛⲁⲓ̈· .[ <text:line-break/><text:soft-page-break/><text:span text:style-name="T1"> </text:span><text:span text:style-name="T2">(108/14) </text:span> ⲛⲓϣⲟ̣[ <text:line-break/><text:span text:style-name="T1"> </text:span><text:span text:style-name="T2">(108/15) </text:span> ⲛⲧⲉ̣ [ <text:line-break/><text:span text:style-name="T1"> </text:span><text:span text:style-name="T2">(108/16) </text:span> ⲟⲛϩ .[ <text:line-break/><text:span text:style-name="T1"> </text:span><text:span text:style-name="T2">(108/17) </text:span> ⲉⲡ[ <text:line-break/><text:span text:style-name="T1"> </text:span><text:span text:style-name="T2">(108/18) </text:span> ⲟⲟ[ <text:line-break/><text:span text:style-name="T1"> </text:span><text:span text:style-name="T2">(108/19) </text:span> ⲟⲩ[ <text:line-break/><text:span text:style-name="T1"> </text:span><text:span text:style-name="T2">(108/20) </text:span> ⲉⲩ[ <text:line-break/><text:span text:style-name="T1"> </text:span><text:span text:style-name="T2">(108/21) </text:span> ϩⲛ̣ [ <text:line-break/><text:span text:style-name="T1"> </text:span><text:span text:style-name="T2">(108/22) </text:span> ⲧ[ <text:line-break/><text:span text:style-name="T1"> </text:span><text:span text:style-name="T2">(108/23) </text:span> (Lines 23 and following do not survive.) <text:line-break/><text:span text:style-name="T1"> </text:span><text:span text:style-name="T2">(109/1) </text:span> (Page 109 does not survive.) <text:line-break/><text:span text:style-name="T1"> </text:span><text:span text:style-name="T2">(110/1) </text:span> (Page 110 does not survive.) <text:line-break/><text:span text:style-name="T1"> </text:span><text:span text:style-name="T2">(111/1) </text:span> (Page 111 does not survive.) <text:line-break/><text:span text:style-name="T1"> </text:span><text:span text:style-name="T2">(112/1) </text:span> (Page 112 does not survive.) <text:line-break/><text:span text:style-name="T1"> </text:span><text:span text:style-name="T2">(113/1) </text:span> ⲙⲛ ϩⲉⲛⲁⲅⲅⲉⲗⲟⲥ̣ ⲙⲛ ϩⲉ̣ⲛ̣ⲇⲉ‐ <text:line-break/><text:span text:style-name="T1"> </text:span><text:span text:style-name="T2">(113/2) </text:span> ⲙⲱⲛ ⲁⲩⲱ ϩⲉⲛⲛⲟⲩⲥ ⲙ[ⲛ] ϩⲉⲛ‐ <text:line-break/><text:span text:style-name="T1"> </text:span><text:span text:style-name="T2">(113/3) </text:span> ⲯⲩⲭⲏ· ⲁⲩⲱ ϩⲉⲛⲍⲱⲟⲛ [ⲙ]ⲛ <text:line-break/><text:span text:style-name="T1"> </text:span><text:span text:style-name="T2">(113/4) </text:span> ϩⲉⲛϣⲏⲛ ⲙⲛ ϩⲉⲛⲥⲱⲙⲁ ⲙⲛ <text:line-break/><text:span text:style-name="T1"> </text:span><text:span text:style-name="T2">(113/5) </text:span> ⲛ̣ⲏ ⲉⲧ’ϣⲟⲟⲡ’ ϩⲁ ⲑⲏ ⲛ ⲛⲁⲓ̈· ⲛⲏ <text:line-break/><text:span text:style-name="T1"> </text:span><text:span text:style-name="T2">(113/6) </text:span> ⲛⲧⲉ ⲛⲓϩⲁⲡⲗⲟⲩⲛ ⲛ ⲥ̣ⲧⲟⲓⲭⲓⲱⲛ <text:line-break/><text:span text:style-name="T1"> </text:span><text:span text:style-name="T2">(113/7) </text:span> ⲛⲧⲉ ⲛⲓⲁⲣⲭⲏ̣ ⲛ ϩⲁⲡⲗ̣[ⲟ]ⲩ̣[ⲛ]· ⲙⲛ <text:line-break/><text:span text:style-name="T1"> </text:span><text:span text:style-name="T2">(113/8) </text:span> ⲛ[ⲏ ⲉ]ⲧ’ϣⲟⲟⲡ’ ϩⲛ [ⲟⲩ]ϫⲱϣ <text:line-break/><text:span text:style-name="T1"> </text:span><text:span text:style-name="T2">(113/9) </text:span> ⲉ[...] ⲁⲩⲱ ⲛ ⲁⲧ’ⲙⲟⲩϫϭ ⲟⲩⲁⲏⲣ <text:line-break/><text:span text:style-name="T1"> </text:span><text:span text:style-name="T2">(113/10) </text:span> [ⲙⲛ ⲟ]ⲩⲙⲟⲟⲩ ⲁⲩⲱ ⲟⲩⲕⲁϩ <text:line-break/><text:span text:style-name="T1"> </text:span><text:span text:style-name="T2">(113/11) </text:span> [ⲙ]ⲛ ⲟⲩⲏⲡⲉ ⲁⲩⲱ ⲟⲩ̣ⲛ̣[ⲟ]ⲩϩⲃ <text:line-break/><text:span text:style-name="T1"> </text:span><text:span text:style-name="T2">(113/12) </text:span> ⲙ̣ⲛ ⲟⲩⲕⲓⲙ ⲁⲩⲱ ⲟ[ⲩ...]ⲟϣ ⲙⲛ <text:line-break/><text:span text:style-name="T1"> </text:span><text:span text:style-name="T2">(113/13) </text:span> [ⲟ]ⲩ̣ⲧⲁⲝⲓⲥ ⲁⲩⲱ ⲟⲩ̣ⲛⲓϥⲉ ⲙⲛ <text:line-break/><text:span text:style-name="T1"> </text:span><text:span text:style-name="T2">(113/14) </text:span> [ⲛⲓⲕ]ⲉ̣ϣⲱϫⲡ’ ⲧⲏⲣⲟⲩ· ϩⲉⲛⲙⲉϩ <text:line-break/><text:span text:style-name="T1"> </text:span><text:span text:style-name="T2">(113/15) </text:span> [ϥⲧ]ⲟⲟⲩ ⲇ̣ⲉ ⲛ ϭⲟⲙ ⲛⲉ ⲉⲧ̣ϣⲟⲟⲡ’ <text:line-break/><text:span text:style-name="T1"> </text:span><text:span text:style-name="T2">(113/16) </text:span> [ϩⲙ] ⲡⲓⲙ[ⲉϩ]ϥⲧⲟ̣ⲟ̣ⲩ ⲛⲛ ⲉⲱⲛ· ⲛⲏ <text:line-break/><text:span text:style-name="T1"> </text:span><text:span text:style-name="T2">(113/17) </text:span> [ⲉⲧ]ϣ̣[ⲟ]ⲟ̣ⲡ’ ϩⲛ ⲛⲓⲡ[.].[.] ⲁ̣ⲩⲱ <text:line-break/><text:span text:style-name="T1"> </text:span><text:span text:style-name="T2">(113/18) </text:span> [.]ϫ̣ⲱⲕ ⲉⲃⲟⲗ ⲛⲧⲉ̣ [...] ⲛⲓϭⲟⲙ <text:line-break/><text:span text:style-name="T1"> </text:span><text:span text:style-name="T2">(113/19) </text:span> [...]ϩⲉⲛϭⲟⲙ ϩⲉⲛ[...]ⲥ ⲛⲧⲉ <text:line-break/><text:span text:style-name="T1"> </text:span><text:span text:style-name="T2">(113/20) </text:span> [...]ⲟ̣ⲩ· ϩⲉⲛⲅ̣[....] ⲛⲧⲉ <text:line-break/><text:span text:style-name="T1"> </text:span><text:span text:style-name="T2">(113/21) </text:span> [........] ϩⲉⲛ̣[ⲁⲅⲅⲉⲗ]ⲟ̣ⲥ ⲛ <text:line-break/><text:span text:style-name="T1"> </text:span><text:span text:style-name="T2">(113/22) </text:span> [ⲧⲉ ⲛⲓⲁ]ⲅ̣ⲅⲉⲗⲟⲥ̣ [ϩⲉⲛ]ⲯⲩⲭ̣ⲏ̣ <text:line-break/><text:span text:style-name="T1"> </text:span><text:span text:style-name="T2">(113/23) </text:span> [ⲛ̅ⲧⲉ ⲛⲓ]ⲯⲩⲭⲏ· ϩⲉ[ⲛ]ⲍⲱⲟⲛ [ⲛ] <text:line-break/><text:span text:style-name="T1"> </text:span><text:span text:style-name="T2">(113/24) </text:span> [ⲧⲉ ⲛⲓⲍ]ⲱⲟⲛ ϩⲉⲛ̣ϣⲏ̣ⲛ̣ ⲛ[ⲧⲉ] <text:line-break/><text:span text:style-name="T1"> </text:span><text:span text:style-name="T2">(113/25) </text:span> [ⲛⲓϣⲏⲛ]· ϩⲉⲛⲥⲩ[.].[.... <text:line-break/><text:span text:style-name="T1"> </text:span><text:span text:style-name="T2">(113/26) </text:span> [.....] ⲁⲩⲱ ϩ[ⲉⲛ...... <text:line-break/><text:span text:style-name="T1"> </text:span><text:span text:style-name="T2">(113/27) </text:span> [.....]ⲁⲧⲁ̣ⲩ̣[......... <text:line-break/><text:span text:style-name="T1"> </text:span><text:span text:style-name="T2">(113/28) </text:span> [......].[ <text:line-break/><text:span text:style-name="T1"> </text:span><text:span text:style-name="T2">(114/1) </text:span> ⲙⲙⲓⲛ ⲙⲙⲟϥ· ⲁⲩⲱ ⲟⲩⲟⲛ ⲛ[ⲏ] <text:line-break/><text:span text:style-name="T1"> </text:span><text:span text:style-name="T2">(114/2) </text:span> ⲙⲉ̣ⲛ ϩⲱⲥ ⲉϩⲉⲛϫⲡⲟ ⲛⲉ· ⲙⲛ <text:line-break/><text:span text:style-name="T1"> </text:span><text:span text:style-name="T2">(114/3) </text:span> ⲛ̣[ⲏ] ⲙⲉⲛ ⲉⲧ’ϣⲟⲟⲡ’ ϩⲛ ⲟⲩϫⲡⲟ <text:line-break/><text:span text:style-name="T1"> </text:span><text:span text:style-name="T2">(114/4) </text:span> ⲛⲛ ⲁⲧⲙⲓⲥⲉ· ⲁⲩⲱ ⲟⲩⲟⲛ ⲛⲏ ⲙ̣[ⲉⲛ] <text:line-break/><text:span text:style-name="T1"> </text:span><text:span text:style-name="T2">(114/5) </text:span> ⲉⲧⲟⲩⲁⲁⲃ· ⲁⲩⲱ ⲉϩⲉⲛϣⲁ ⲉ[ⲛⲉϩ] <text:line-break/><text:soft-page-break/><text:span text:style-name="T1"> </text:span><text:span text:style-name="T2">(114/6) </text:span> ⲛⲉ· ⲙⲛ̣ ⲛⲓⲁⲧ’ⲟⲩⲱⲧⲃ ⲉⲃⲟⲗ ⲛ̣‐ <text:line-break/><text:span text:style-name="T1"> </text:span><text:span text:style-name="T2">(114/7) </text:span> ϩⲣⲁⲓ̣̈ [ϩⲛ ⲟ]ⲩ〈ⲟⲩ〉ⲱⲧⲃ ⲉⲃⲟⲗ· ⲙⲛ ⲟⲩ‐ <text:line-break/><text:span text:style-name="T1"> </text:span><text:span text:style-name="T2">(114/8) </text:span> ⲧⲁⲕⲟ [ⲛϩⲣ]ⲁⲓ̈ ϩⲛ ⲟⲩⲙⲛⲧ’ⲁ̣[ⲧ]ⲧⲁⲕⲟ· <text:line-break/><text:span text:style-name="T1"> </text:span><text:span text:style-name="T2">(114/9) </text:span> ⲁⲩⲱ ⲟⲩ̣ⲟⲛ ⲛⲏ ⲙⲉⲛ ϩⲱ̣[ⲥ] ⲉϩⲉ̣ⲛ̣‐ <text:line-break/><text:span text:style-name="T1"> </text:span><text:span text:style-name="T2">(114/10) </text:span> ⲧⲏⲣⲟⲩ ⲛⲉ· ⲟⲩⲟⲛ ⲛⲏ ⲉ[ϩⲉⲛ ⲅⲉ]‐ <text:line-break/><text:span text:style-name="T1"> </text:span><text:span text:style-name="T2">(114/11) </text:span> ⲛⲟⲥ ⲛⲉ ⲙⲛ ⲛⲏ ⲉⲧ’ϣⲟⲟⲡ’ [ϩⲛ ⲟ]ⲩ̣‐ <text:line-break/><text:span text:style-name="T1"> </text:span><text:span text:style-name="T2">(114/12) </text:span> ⲕⲟⲥ̣[ⲙⲟ]ⲥ ⲙⲛ ⲟⲩⲧⲁⲝⲓⲥ· ⲟⲩ[ⲟⲛ] <text:line-break/><text:span text:style-name="T1"> </text:span><text:span text:style-name="T2">(114/13) </text:span> ⲛⲏ ⲙⲉⲛ̣ ϩⲛ ⲟⲩⲙⲛⲧ’ⲁⲧ’ⲧ̣[ⲁⲕⲟ] <text:line-break/><text:span text:style-name="T1"> </text:span><text:span text:style-name="T2">(114/14) </text:span> ⲁⲩⲱ ⲟⲩⲟⲛ ⲛⲓϣⲟⲣⲡ’ ⲉ̣[ⲧⲁϩⲉ]‐ <text:line-break/><text:span text:style-name="T1"> </text:span><text:span text:style-name="T2">(114/15) </text:span> ⲣⲁⲧⲟⲩ ⲙⲛ ⲛⲓⲙⲉϩⲥ̣ⲛ̣ⲁⲩ [ϩⲛ] <text:line-break/><text:span text:style-name="T1"> </text:span><text:span text:style-name="T2">(114/16) </text:span> ⲛⲁⲓ̈ ⲧⲏⲣⲟⲩ· ⲛⲏ ⲧ[ⲏⲣ]ⲟⲩ [ⲉⲧϣⲟ]‐ <text:line-break/><text:span text:style-name="T1"> </text:span><text:span text:style-name="T2">(114/17) </text:span> ⲟⲡ’̣ [ⲉⲃ]ⲟ̣[ⲗ ϩ]ⲛ ⲛⲁⲓ̈· ⲁⲩⲱ̣ ⲛ̣ⲏ̣ [ⲉⲧ]‐ <text:line-break/><text:span text:style-name="T1"> </text:span><text:span text:style-name="T2">(114/18) </text:span> ϣⲟⲟⲡ’̣ [ϩⲛ] ⲛⲁⲓ̈· ⲁⲩⲱ ⲉ̣[.... <text:line-break/><text:span text:style-name="T1"> </text:span><text:span text:style-name="T2">(114/19) </text:span> ⲛⲁⲓ̈ ⲉⲧ̣[ⲟⲩ]ⲏϩ ⲛⲥⲁ ⲛⲁⲓ̈ [..... <text:line-break/><text:span text:style-name="T1"> </text:span><text:span text:style-name="T2">(114/20) </text:span> ⲃⲟⲗ ⲙ [....]ⲩ ⲉ[......... <text:line-break/><text:span text:style-name="T1"> </text:span><text:span text:style-name="T2">(114/21) </text:span> ⲛⲁⲓ̈ [.....] ⲉⲩⲟⲩ[...... <text:line-break/><text:span text:style-name="T1"> </text:span><text:span text:style-name="T2">(114/22) </text:span> ⲁⲩⲱ ⲁ[ⲩⲁ]ϩⲉⲣⲁⲧⲟ[ⲩ ...... <text:line-break/><text:span text:style-name="T1"> </text:span><text:span text:style-name="T2">(114/23) </text:span> [ⲙ]ⲉϩϥⲧⲟⲟⲩ ⲛⲛ ⲉⲱ̣[ⲛ.... <text:line-break/><text:span text:style-name="T1"> </text:span><text:span text:style-name="T2">(114/24) </text:span> [.....] ⲉⲩ̣ϣⲟⲟⲡ’ [...... <text:line-break/><text:span text:style-name="T1"> </text:span><text:span text:style-name="T2">(114/25) </text:span> [........]ⲉ ⲉⲩϣⲟ̣[..... <text:line-break/><text:span text:style-name="T1"> </text:span><text:span text:style-name="T2">(114/26) </text:span> [........]. ⲧⲏⲣ. [...... <text:line-break/><text:span text:style-name="T1"> </text:span><text:span text:style-name="T2">(115/1) </text:span> ⲛϩⲏⲧⲟⲩ ⲉϥϫⲟⲟⲣ ⲉⲃⲟⲗ· ⲁⲩⲱ <text:line-break/><text:span text:style-name="T1"> </text:span><text:span text:style-name="T2">(115/2) </text:span> ⲉⲛⲥⲉϩⲟϫϩⲉϫ ⲛ ⲛⲉⲩⲉⲣⲏⲩ [ⲁ]ⲛ̣ <text:line-break/><text:span text:style-name="T1"> </text:span><text:span text:style-name="T2">(115/3) </text:span> ⲁⲗⲗⲁ ⲛⲧⲟⲟⲩ ϩⲱⲟⲩ ⲉⲩⲟⲛϩ ⲛ‐ <text:line-break/><text:span text:style-name="T1"> </text:span><text:span text:style-name="T2">(115/4) </text:span> [ϩ]ⲣ̣ⲁⲓ̈ ⲛϩⲏⲧⲟⲩ ⲉⲩϣⲟⲟⲡ’ ⲁⲩⲱ <text:line-break/><text:span text:style-name="T1"> </text:span><text:span text:style-name="T2">(115/5) </text:span> ⲉ̣ⲩϯ ⲙⲁⲧⲉ ⲙⲛ ⲛⲉⲩⲉⲣⲏⲩ ϩⲱⲥ <text:line-break/><text:span text:style-name="T1"> </text:span><text:span text:style-name="T2">(115/6) </text:span> [ⲉ]ⲩϣⲟⲟⲡ’ ⲉⲃⲟⲗ ϩⲛ ⲟⲩⲁⲣⲭⲏ ⲛ <text:line-break/><text:span text:style-name="T1"> </text:span><text:span text:style-name="T2">(115/7) </text:span> ⲟ̣ⲩⲱⲧ’· ⲁⲩⲱ ⲥⲉϣⲟ[ⲟⲡ’] ⲉⲩϩⲟ‐ <text:line-break/><text:span text:style-name="T1"> </text:span><text:span text:style-name="T2">(115/8) </text:span> ⲧⲡ’̣ [ϫ]ⲉ ⲥⲉϣⲟⲟⲡ’ ⲧⲏⲣⲟⲩ ⲛϩⲣⲁⲓ̈ <text:line-break/><text:span text:style-name="T1"> </text:span><text:span text:style-name="T2">(115/9) </text:span> ϩⲛ ⲟ̣[ⲩ]ⲉⲱⲛ ⲛ ⲟⲩⲱⲧ’ ⲛⲧⲉ ⲡⲓⲕ̅ⲗ̅ⲥ̅ <text:line-break/><text:span text:style-name="T1"> </text:span><text:span text:style-name="T2">(115/10) </text:span> [...].ⲉ ϩⲛ ⲟⲩϭⲟⲙ ⲉⲩⲡⲟⲣϫ ⲉⲃⲟⲗ· <text:line-break/><text:span text:style-name="T1"> </text:span><text:span text:style-name="T2">(115/11) </text:span> [ⲕ]ⲁ̣ⲧⲁ ⲅⲁⲣ ⲡⲟⲩⲁ ⲡⲟⲩⲁ ·ⲛⲧⲉ ⲛⲓⲉ‐ <text:line-break/><text:span text:style-name="T1"> </text:span><text:span text:style-name="T2">(115/12) </text:span> [ⲱ]ⲛ̣ ⲥⲉϣⲟⲟⲡ’ ⲉⲩⲁϩⲉⲣⲁⲧⲟⲩ <text:line-break/><text:span text:style-name="T1"> </text:span><text:span text:style-name="T2">(115/13) </text:span> [ⲕⲁ]ⲧⲁ ⲡⲏ ⲉⲧ’ⲡⲏϩ ⲉⲣⲟⲟⲩ· ⲡⲓⲕ̅ⲗ̅ⲥ̅ <text:line-break/><text:span text:style-name="T1"> </text:span><text:span text:style-name="T2">(115/14) </text:span> [ⲇⲉ ⲟ]ⲩⲉⲱⲛ ⲛ ⲟⲩⲱⲧ’ ⲡⲉ ⲟⲩⲛ‐ <text:line-break/><text:span text:style-name="T1"> </text:span><text:span text:style-name="T2">(115/15) </text:span> [ⲧⲁϥ] ⲙ̣ⲙⲁⲩ ⲛ ϥⲧⲟⲟⲩ ⲛ ⲇⲓⲁⲫⲟ‐ <text:line-break/><text:span text:style-name="T1"> </text:span><text:span text:style-name="T2">(115/16) </text:span> [ⲣⲁ ⲛ]ⲧⲉ ϩⲉⲛⲉⲱⲛ· ⲁⲩⲱ ⲕⲁⲧⲁ <text:line-break/><text:span text:style-name="T1"> </text:span><text:span text:style-name="T2">(115/17) </text:span> [ⲡⲟ]ⲩ̣ⲁ ⲡⲟⲩⲁ ⲛⲧⲉ ⲛⲓⲉⲱⲛ ⲟⲩⲛ‐ <text:line-break/><text:span text:style-name="T1"> </text:span><text:span text:style-name="T2">(115/18) </text:span> [ⲧⲁ]ⲩ̣ ⲙⲙⲁⲩ ⲛ ϩⲉⲛ[ϭⲟ]ⲙ̣ ⲙ ⲡⲣⲏ‐ <text:line-break/><text:span text:style-name="T1"> </text:span><text:span text:style-name="T2">(115/19) </text:span> [ⲧⲉ ⲛ] ϩ̣ⲉⲛϣⲟⲣⲡ’ ⲁⲛ ⲙⲛ ϩⲉⲛⲙⲉϩ‐ <text:line-break/><text:span text:style-name="T1"> </text:span><text:span text:style-name="T2">(115/20) </text:span> [ⲥⲛⲁ]ⲩ̣ ⲛ̣ⲁⲓ̈ ⲧⲏⲣⲟⲩ ⲅⲁⲣ ϩⲉⲛϣⲁ ⲉ‐ <text:line-break/><text:span text:style-name="T1"> </text:span><text:span text:style-name="T2">(115/21) </text:span> [ⲛⲉϩ ⲛⲉ ⲁⲩ]ⲱ̣ [ⲥ]ⲉϣ[ⲉ]ⲃ̣ⲓ̣ⲏⲟⲩⲧ’ <text:line-break/><text:span text:style-name="T1"> </text:span><text:span text:style-name="T2">(115/22) </text:span> [..... ⲟ]ⲩⲧⲁⲝⲓⲥ ⲙ[ⲛ] ⲟⲩⲉⲟⲟⲩ <text:line-break/><text:span text:style-name="T1"> </text:span><text:span text:style-name="T2">(115/23) </text:span> [......].ⲉ ⲉⲧ’ϣⲟ[ⲟ]ⲡ’ ⲛϩ[ⲣⲁ]ⲓ̈ <text:line-break/><text:span text:style-name="T1"> </text:span><text:span text:style-name="T2">(115/24) </text:span> [ϩⲛ ....]ϥⲧⲟⲟⲩ ⲛ̣ⲛ ⲉⲱⲛ [ⲙ]ⲛ̣ <text:line-break/><text:span text:style-name="T1"> </text:span><text:span text:style-name="T2">(115/25) </text:span> [.....ⲉ]ⲧⲣ ϣⲟⲣⲡ̣ ⲛ ϣ̣[ⲟⲟⲡ’] <text:line-break/><text:span text:style-name="T1"> </text:span><text:span text:style-name="T2">(115/26) </text:span> [.......]ⲛⲟⲩⲧ[ⲉ <text:line-break/><text:soft-page-break/><text:span text:style-name="T1"> </text:span><text:span text:style-name="T2">(115/27) </text:span> [......]ⲥ ⲛⲉ ⲙ[ <text:line-break/><text:span text:style-name="T1"> </text:span><text:span text:style-name="T2">(115/28) </text:span> [........]..[ <text:line-break/><text:span text:style-name="T1"> </text:span><text:span text:style-name="T2">(116/1) </text:span> ⲛⲁⲓ̈ ⲧⲏⲣⲟⲩ ⲇⲉ ⲥⲉϣⲟⲟⲡ’ ⲛ‐ <text:line-break/><text:span text:style-name="T1"> </text:span><text:span text:style-name="T2">(116/2) </text:span> ϩⲣⲁ̣ⲓ̈ ϩⲛ ⲟⲩⲁ ⲉⲩϣⲟⲟⲡ’ ϩⲓ ⲟⲩⲙⲁ <text:line-break/><text:span text:style-name="T1"> </text:span><text:span text:style-name="T2">(116/3) </text:span> ⲁⲩⲱ ⲕⲁⲧⲁ ⲟⲩⲁ ⲉⲩϫⲏⲕ ⲉⲃⲟⲗ <text:line-break/><text:span text:style-name="T1"> </text:span><text:span text:style-name="T2">(116/4) </text:span> ⲛϩⲣⲁⲓ̈ ϩⲛ ⲟⲩⲙⲛⲧ’ϣⲃⲏⲣ ⲁⲩ[ⲱ] <text:line-break/><text:span text:style-name="T1"> </text:span><text:span text:style-name="T2">(116/5) </text:span> ⲉⲁⲩⲙⲟⲩϩ ⲉⲃⲟⲗ ⲙ ⲡⲓⲉⲱⲛ ⲉ[ⲧ’]‐ <text:line-break/><text:span text:style-name="T1"> </text:span><text:span text:style-name="T2">(116/6) </text:span> ϣⲟⲟⲡ’ [ⲟ]ⲛⲧⲱⲥ· ⲁⲩⲱ ⲟⲩⲟⲛ̣ <text:line-break/><text:span text:style-name="T1"> </text:span><text:span text:style-name="T2">(116/7) </text:span> ⲛⲏ ⲙⲉ̣[ⲛ] ⲛ̣ϩⲏⲧⲟⲩ ⲉⲧⲁϩⲉⲣⲁⲧⲟⲩ <text:line-break/><text:span text:style-name="T1"> </text:span><text:span text:style-name="T2">(116/8) </text:span> ϩⲱⲥ ⲉⲩϣⲟⲟⲡ’ ϩⲛ ⲟⲩⲟ̣[ⲩ]ⲥ̣ⲓⲁ <text:line-break/><text:span text:style-name="T1"> </text:span><text:span text:style-name="T2">(116/9) </text:span> ⲙⲛ ⲛⲏ ⲙⲉⲛ ⲙ ⲡⲣⲏⲧⲉ ⲛ̣ [ⲟⲩⲟⲩⲥ]ⲓ̣ⲁ <text:line-break/><text:span text:style-name="T1"> </text:span><text:span text:style-name="T2">(116/10) </text:span> ϩⲛ ⲟⲩⲡⲣⲁⲝⲓⲥ ⲏ%0 ⲟⲩϫⲓ ⲙⲕ[ⲁϩ ⲉ]ⲩ̣‐ <text:line-break/><text:span text:style-name="T1"> </text:span><text:span text:style-name="T2">(116/11) </text:span> ϣⲟⲟⲡ’ ϩⲛ ⲟⲩⲙⲉϩⲥⲛⲁⲩ· ⲉ[ⲥϣⲟ]‐ <text:line-break/><text:span text:style-name="T1"> </text:span><text:span text:style-name="T2">(116/12) </text:span> ⲟⲡ’ ⲅⲁⲣ ⲛϩⲏⲧⲟⲩ ⲛϭⲓ ϯⲙⲛⲧ[ⲁⲧⲙⲓ]‐ <text:line-break/><text:span text:style-name="T1"> </text:span><text:span text:style-name="T2">(116/13) </text:span> ⲥⲉ ⲛⲧⲉ ⲛⲓⲙⲛⲧ’ⲁⲧ’ⲙⲓⲥⲉ̣ [ⲉⲧϣⲟ]‐ <text:line-break/><text:span text:style-name="T1"> </text:span><text:span text:style-name="T2">(116/14) </text:span> ⲟⲡ’ ⲟⲛⲧⲱⲥ· ⲁⲩⲱ ⲛⲓⲁ[ⲧⲙⲓⲥⲉ] <text:line-break/><text:span text:style-name="T1"> </text:span><text:span text:style-name="T2">(116/15) </text:span> ⲉⲧⲁⲩϣⲱⲡⲉ ⲉⲥⲁϩⲉⲣⲁ[ⲧⲥ ⲛ]‐ <text:line-break/><text:span text:style-name="T1"> </text:span><text:span text:style-name="T2">(116/16) </text:span> ϭⲓ ⲧⲉⲩϭⲟ̣ⲙ· ⲉⲥⲙⲙⲁ̣ⲩ ⲛϭ̣[ⲓ ⲟⲩ]‐ <text:line-break/><text:span text:style-name="T1"> </text:span><text:span text:style-name="T2">(116/17) </text:span> ⲟⲩⲥⲓ[ⲁ ⲛ]ⲛ ⲁⲧ’ⲥⲱⲙⲁ ⲙⲛ̣ [ⲟⲩⲥⲱ] <text:line-break/><text:span text:style-name="T1"> </text:span><text:span text:style-name="T2">(116/18) </text:span> ⲙⲁ ⲉⲧⲉ ⲙⲁⲥⲧⲉⲕⲟ· ⲉϥⲙ[ⲡⲓⲙⲁ] <text:line-break/><text:span text:style-name="T1"> </text:span><text:span text:style-name="T2">(116/19) </text:span> ⲉⲧⲙⲙⲁⲩ ⲛϭⲓ ⲡⲓⲁⲧ’ⲟ̣[ⲩⲱⲧⲃ ⲉ]‐ <text:line-break/><text:span text:style-name="T1"> </text:span><text:span text:style-name="T2">(116/20) </text:span> ⲃⲟⲗ ⲉⲧ’ϣⲟⲟⲡ’ ⲟ[ⲛⲧⲱⲥ ⲁⲩⲱ] <text:line-break/><text:span text:style-name="T1"> </text:span><text:span text:style-name="T2">(116/21) </text:span> ⲡⲏ̣ ⲉϣ[ⲁ]ϥ̣ⲟⲩⲱⲧⲃ [ⲉⲃⲟⲗ ϩⲛ ⲟⲩ]‐ <text:line-break/><text:span text:style-name="T1"> </text:span><text:span text:style-name="T2">(116/22) </text:span> ϣ̣[ⲓ]ⲃⲉ ⲉϥⲁϩⲉⲣⲁⲧϥ ⲙ[ⲛ ⲛⲁⲓ̈] <text:line-break/><text:span text:style-name="T1"> </text:span><text:span text:style-name="T2">(116/23) </text:span> ⲣ̣[ⲟ]ⲩ ⲛ̣ϭⲓ [ⲡⲓ]ⲕⲱϩⲧ’ ⲛ[ <text:line-break/><text:span text:style-name="T1"> </text:span><text:span text:style-name="T2">(116/24) </text:span> [.......]ⲁ̣[ⲧ’]ⲧⲁⲕⲟ· ⲁ[ <text:line-break/><text:span text:style-name="T1"> </text:span><text:span text:style-name="T2">(116/25) </text:span> [.......]. ⲟⲩⲁ ⲛ̣[ <text:line-break/><text:span text:style-name="T1"> </text:span><text:span text:style-name="T2">(117/1) </text:span> ⲉϥⲁϩⲉⲣⲁⲧϥ· ⲉⲩⲙⲡⲙⲁ ⲉⲧⲙ‐ <text:line-break/><text:span text:style-name="T1"> </text:span><text:span text:style-name="T2">(117/2) </text:span> ⲙⲁⲩ ⲛϭⲓ ⲛⲓⲍⲱⲟⲛ ⲧⲏⲣⲟⲩ ⲉⲩ‐ <text:line-break/><text:span text:style-name="T1"> </text:span><text:span text:style-name="T2">(117/3) </text:span> ϣⲟⲟⲡ’ ⲛ ⲕⲁⲧⲁ ⲟⲩⲁ ⲉⲩϩⲟⲧⲡ’ <text:line-break/><text:span text:style-name="T1"> </text:span><text:span text:style-name="T2">(117/4) </text:span> [ϩ]ⲓ̣ ⲟ[ⲩ]ⲙⲁ ⲧⲏⲣⲟⲩ· ⲉⲥⲙⲙⲁⲩ ⲛ‐ <text:line-break/><text:span text:style-name="T1"> </text:span><text:span text:style-name="T2">(117/5) </text:span> ϭⲓ ϯⲅ̣ⲛ̣ⲱⲥⲓⲥ ⲛⲧⲉ ϯⲅⲛⲱⲥⲓⲥ <text:line-break/><text:span text:style-name="T1"> </text:span><text:span text:style-name="T2">(117/6) </text:span> ⲙⲛ ⲟⲩⲧⲁϩⲟ ⲛⲧⲉ ϯ[ⲙ]ⲛ̣ⲧ’ⲁⲧ’‐ <text:line-break/><text:span text:style-name="T1"> </text:span><text:span text:style-name="T2">(117/7) </text:span> ⲉⲓⲙⲉ· ⲉ̣ϥ̣ⲙⲙⲁⲩ ⲛϭⲓ̣ ⲟ̣ⲩⲭⲁⲟⲥ <text:line-break/><text:span text:style-name="T1"> </text:span><text:span text:style-name="T2">(117/8) </text:span> ⲙⲛ [ⲟⲩⲧⲟ]ⲡⲟⲥ ⲛⲧⲁⲩ ⲧⲏⲣⲟⲩ <text:line-break/><text:span text:style-name="T1"> </text:span><text:span text:style-name="T2">(117/9) </text:span> ⲉ̣ϥ̣[ϫⲏⲕ] ⲉⲃⲟⲗ ⲁⲩⲱ ⲉⲩⲉ ⲛ ⲃⲣⲣⲉ· <text:line-break/><text:span text:style-name="T1"> </text:span><text:span text:style-name="T2">(117/10) </text:span> [ⲟ]ⲩ̣〈ⲟⲩ〉ⲟ̣ⲉⲓⲛ ⲇⲉ ⲛ ⲧⲁⲡⲙⲉ ⲁⲩⲱ ⲟⲩ‐ <text:line-break/><text:span text:style-name="T1"> </text:span><text:span text:style-name="T2">(117/11) </text:span> [ⲕ]ⲁ̣ⲕⲉ ⲉⲁϥϫⲓ ⲟⲩⲟⲉⲓⲛ ⲙⲛ ⲡⲏ <text:line-break/><text:span text:style-name="T1"> </text:span><text:span text:style-name="T2">(117/12) </text:span> [ⲉ]ⲧⲉ ⲛϥϣⲟⲟⲡ’ ⲁⲛ ⲟⲛⲧⲱⲥ· <text:line-break/><text:span text:style-name="T1"> </text:span><text:span text:style-name="T2">(117/13) </text:span> [ⲡⲏ ⲛ]ⲉϥϣⲟⲟⲡ’ ⲁⲛ ⲟⲛⲧⲱⲥ· <text:line-break/><text:span text:style-name="T1"> </text:span><text:span text:style-name="T2">(117/14) </text:span> [.. ⲡ]ⲓⲁⲧ’ϣⲱⲡⲉ ⲉⲧⲉ ⲛϥϣⲟ‐ <text:line-break/><text:span text:style-name="T1"> </text:span><text:span text:style-name="T2">(117/15) </text:span> [ⲟⲡ’] ⲁⲛ ⲉ ⲡⲧⲏⲣϥ· ⲛⲧⲟϥ ⲇⲉ ⲡⲓ‐ <text:line-break/><text:span text:style-name="T1"> </text:span><text:span text:style-name="T2">(117/16) </text:span> [ⲁⲅⲁ]ⲑⲟⲛ ⲉⲧⲉ ⲉⲃⲟⲗ ⲙⲙⲟϥ ⲡⲉ <text:line-break/><text:span text:style-name="T1"> </text:span><text:span text:style-name="T2">(117/17) </text:span> [ⲡⲓ]ⲁ̣ⲅⲁⲑⲟⲛ ⲙⲛ ⲡⲏ [ⲉⲧ]ⲛⲁⲛⲟⲩϥ <text:line-break/><text:span text:style-name="T1"> </text:span><text:span text:style-name="T2">(117/18) </text:span> [ⲁⲩ]ⲱ̣ ⲡⲛⲟⲩⲧⲉ ⲉⲧⲉ ⲉⲃⲟⲗ ⲙ‐ <text:line-break/><text:span text:style-name="T1"> </text:span><text:span text:style-name="T2">(117/19) </text:span> [ⲙⲟϥ] ⲡ̣[ⲉ] ⲡⲛⲟⲩⲧⲉ ⲙⲛ ⲡⲏ ⲉⲧ’‐ <text:line-break/><text:span text:style-name="T1"> </text:span><text:span text:style-name="T2">(117/20) </text:span> [.........]ⲧⲉ· ⲡⲏ ⲉⲧⲛⲉⲁϥ· <text:line-break/><text:soft-page-break/><text:span text:style-name="T1"> </text:span><text:span text:style-name="T2">(117/21) </text:span> [.......]ⲩ ⲅⲁⲣ ϩⲛ ⲟⲩⲙⲉⲣⲟ̣ⲥ <text:line-break/><text:span text:style-name="T1"> </text:span><text:span text:style-name="T2">(117/22) </text:span> [......]ⲉⲓⲇⲟⲥ ⲙⲛ ⲡⲛⲟⲩ[ⲧ]ⲉ <text:line-break/><text:span text:style-name="T1"> </text:span><text:span text:style-name="T2">(117/23) </text:span> [......] ⲉⲧⲙⲙⲁⲩ ⲙⲛ ⲡⲏ [..] <text:line-break/><text:span text:style-name="T1"> </text:span><text:span text:style-name="T2">(117/24) </text:span> [.....ⲟ]ⲩⲛⲟⲩⲧⲉ [ <text:line-break/><text:span text:style-name="T1"> </text:span><text:span text:style-name="T2">(117/25) </text:span> [......]ⲉ ⲛⲁⲓ̈ ⲧⲏ̣[ⲣⲟⲩ] <text:line-break/><text:span text:style-name="T1"> </text:span><text:span text:style-name="T2">(117/26) </text:span> [......]ⲧ’̣ ⲕⲁⲕ[ⲉ <text:line-break/><text:span text:style-name="T1"> </text:span><text:span text:style-name="T2">(117/27) </text:span> [........]ϥ[ <text:line-break/><text:span text:style-name="T1"> </text:span><text:span text:style-name="T2">(118/1) </text:span> ⲁⲩⲱ ⲟⲩⲅⲉⲛⲟⲥ· ⲁⲩⲱ ⲉⲙⲡ̅ϥ̅‐ <text:line-break/><text:span text:style-name="T1"> </text:span><text:span text:style-name="T2">(118/2) </text:span> ⲧⲱϩ ⲙⲛ ⲗⲁⲁⲩ· ⲁⲗⲗⲁ ⲉϥϭⲉⲉⲧ’ <text:line-break/><text:span text:style-name="T1"> </text:span><text:span text:style-name="T2">(118/3) </text:span> ⲙⲁⲩⲁⲁϥ ⲛϩⲣⲁⲓ̈ ⲛϩⲏⲧϥ ⲁⲩⲱ <text:line-break/><text:span text:style-name="T1"> </text:span><text:span text:style-name="T2">(118/4) </text:span> ⲉϥⲙⲟⲧⲛ ⲙⲙⲟϥ ⲛϩⲣⲁⲓ̈ ϩⲙ̣ ⲡ̣ⲓ̣[ⲁ]‐ <text:line-break/><text:span text:style-name="T1"> </text:span><text:span text:style-name="T2">(118/5) </text:span> ⲣⲏϫϥ ⲛⲧⲁϥ ⲛⲛ ⲁⲧⲛ ⲁⲣⲏϫ̣ϥ· ⲡⲁⲓ̈ <text:line-break/><text:span text:style-name="T1"> </text:span><text:span text:style-name="T2">(118/6) </text:span> ⲇⲉ ⲡⲉ [ⲡ]ⲛ̣ⲟⲩⲧⲉ ⲛⲧⲉ ⲛⲏ ⲉⲧϣⲟ̣‐ <text:line-break/><text:span text:style-name="T1"> </text:span><text:span text:style-name="T2">(118/7) </text:span> ⲟⲡ’ ⲟⲛⲧⲱⲥ· ⲟⲩⲣ̣[ⲉϥ]ⲛ[ⲁⲩ] ⲉⲣⲟϥ <text:line-break/><text:span text:style-name="T1"> </text:span><text:span text:style-name="T2">(118/8) </text:span> ⲙⲛ ⲟⲩⲣⲉϥⲟⲩⲉⲛϩ ⲛⲟ[ⲩⲧⲉ ⲉⲃ]ⲟⲗ· <text:line-break/><text:span text:style-name="T1"> </text:span><text:span text:style-name="T2">(118/9) </text:span> ⲉⲁⲥϯ ϭⲟⲙ ⲙ ⲡⲏ ⲉⲧ’ⲥⲟ̣[ⲩⲱⲛⲥ] <text:line-break/><text:span text:style-name="T1"> </text:span><text:span text:style-name="T2">(118/10) </text:span> ⲛϭⲓ ϯⲃⲁⲣⲃⲏⲗⲱ ⲡⲓⲁⲓⲱⲛ ϯ[ⲅⲛⲱ]‐ <text:line-break/><text:span text:style-name="T1"> </text:span><text:span text:style-name="T2">(118/11) </text:span> ⲥⲓⲥ ⲛⲧⲉ ⲡⲓⲁϩⲟⲣⲁⲧⲟⲛ ⲛ ϣⲙ[ⲧ’]‐ <text:line-break/><text:span text:style-name="T1"> </text:span><text:span text:style-name="T2">(118/12) </text:span> ϭⲟⲙ ⲛ ⲧⲉⲗⲓⲟⲥ ⲙ ⲡ̅ⲛ̅ⲁ̅ ⲁϯ[ <text:line-break/><text:span text:style-name="T1"> </text:span><text:span text:style-name="T2">(118/13) </text:span> ⲛⲁⲥ ⲉⲥϫⲱ ⲙⲙⲟⲥ ϫⲉ ϥ[ <text:line-break/><text:span text:style-name="T1"> </text:span><text:span text:style-name="T2">(118/14) </text:span> ⲟⲩⲱⲛϩ ϯⲟⲛϩ ⲛϩⲣⲁⲓ̈ ϩⲛ ⲟ̣[ <text:line-break/><text:span text:style-name="T1"> </text:span><text:span text:style-name="T2">(118/15) </text:span> ⲕⲟⲛϩ ⲡⲓⲟⲩⲁ· ϥⲟⲛϩ ⲛϭ[ⲓ ⲡⲏ] <text:line-break/><text:span text:style-name="T1"> </text:span><text:span text:style-name="T2">(118/16) </text:span> ⲉⲧⲉ ⲛ [ϣ]ⲟ̣ⲙⲧ’ ⲛⲧⲟⲕ ⲡⲉ [ⲡϣⲟ]‐ <text:line-break/><text:span text:style-name="T1"> </text:span><text:span text:style-name="T2">(118/17) </text:span> ⲙⲧ’ ⲉⲧⲉ ⲛ ϣⲟⲙⲧ’ ⲛ ⲕⲱ̣[ⲃ...] <text:line-break/><text:span text:style-name="T1"> </text:span><text:span text:style-name="T2">(118/18) </text:span> ⲉⲉⲉ· ⲡⲓϣⲟⲣⲡ’ ⲛ ⲍ̅ ⲛ̣ [ <text:line-break/><text:span text:style-name="T1"> </text:span><text:span text:style-name="T2">(118/19) </text:span> ϯⲙⲉϩϣⲟⲙⲧⲉ̣ [ <text:line-break/><text:span text:style-name="T1"> </text:span><text:span text:style-name="T2">(118/20) </text:span> ⲡⲓⲙⲉϩⲥⲛⲁⲩ ⲛ ⲥ.[ <text:line-break/><text:span text:style-name="T1"> </text:span><text:span text:style-name="T2">(118/21) </text:span> ⲉ̣ⲉⲉⲉ ⲁⲁⲁⲁⲁⲁⲁ[ <text:line-break/><text:span text:style-name="T1"> </text:span><text:span text:style-name="T2">(118/22) </text:span> [.] ⲥ̣ⲛⲧⲉ ⲡⲁⲓ̈ ⲇⲉ ϥⲧ[ⲟⲟⲩ <text:line-break/><text:span text:style-name="T1"> </text:span><text:span text:style-name="T2">(118/23) </text:span> [....].. ϯⲅⲛⲱ̣[ⲥⲓⲥ <text:line-break/><text:span text:style-name="T1"> </text:span><text:span text:style-name="T2">(118/24) </text:span> [........]ⲧ̣ϥ· ⲧⲏ[ <text:line-break/><text:span text:style-name="T1"> </text:span><text:span text:style-name="T2">(118/25) </text:span> [ ]ⲉⲓ̣[ <text:line-break/><text:span text:style-name="T1"> </text:span><text:span text:style-name="T2">(119/1) </text:span> ⲟⲩⲙⲉⲣⲟⲥ· ⲁϣ ⲛ ⲛⲟⲩⲥ ⲁⲩⲱ <text:line-break/><text:span text:style-name="T1"> </text:span><text:span text:style-name="T2">(119/2) </text:span> ⲁϣ ⲛ ⲥⲟⲫⲓⲁ· ⲁⲩⲱ ⲁϣ ⲛⲛ ⲉⲡⲓⲥ‐ <text:line-break/><text:span text:style-name="T1"> </text:span><text:span text:style-name="T2">(119/3) </text:span> ⲧⲏⲙⲏ ⲏ%0 ⲁϣ ⲛ ⲥⲃⲱ· ϣⲁⲩϯ ⲣⲁⲛ <text:line-break/><text:span text:style-name="T1"> </text:span><text:span text:style-name="T2">(119/4) </text:span> [ⲇ]ⲉ ⲉ̣ [ⲛ]ⲉϥⲫⲱⲥⲧⲏⲣ ⲡⲓϣⲟⲣⲡ’ ⲙⲉⲛ <text:line-break/><text:span text:style-name="T1"> </text:span><text:span text:style-name="T2">(119/5) </text:span> [ⲡⲉ ⲁ̅ⲣ̅ⲙ̅ⲏ̅]̅ⲇ̅ⲱ̅ⲛ̅ ⲙⲛ ⲧⲏ ⲉⲧⲛⲙⲙⲁϥ <text:line-break/><text:span text:style-name="T1"> </text:span><text:span text:style-name="T2">(119/6) </text:span> ..[... ⲡ]ⲓⲙⲉϩⲥⲛⲁⲩ ⲡⲉ ⲇⲓⲫⲁ‐ <text:line-break/><text:span text:style-name="T1"> </text:span><text:span text:style-name="T2">(119/7) </text:span> ⲛⲉ̣[.. ⲙⲛ ⲧ]ⲏ ⲉⲧⲛⲙ[ⲙ]ⲁϥ ⲇ̅ⲏ̅ⲓ̅ <text:line-break/><text:span text:style-name="T1"> </text:span><text:span text:style-name="T2">(119/8) </text:span> ⲫ̅[ .. ⲡ]ⲓⲙⲉϩϣⲟⲙⲧ’ ⲡⲉ <text:line-break/><text:span text:style-name="T1"> </text:span><text:span text:style-name="T2">(119/9) </text:span> [ⲙⲁⲗⲥⲏⲇ]ⲱⲛ ⲙⲛ ⲧⲏ ⲉⲧⲛⲙⲙⲁϥ <text:line-break/><text:span text:style-name="T1"> </text:span><text:span text:style-name="T2">(119/10) </text:span> [.....] ⲡⲓⲙⲉϩϥⲧⲟⲟⲩ ⲡⲉ <text:line-break/><text:span text:style-name="T1"> </text:span><text:span text:style-name="T2">(119/11) </text:span> [....]ⲥ ⲙⲛ ⲧⲏ ⲉⲧⲛⲙⲙⲁϥ ⲟ̅ⲗ̅ⲙ̅ⲓ̅ⲥ̅ <text:line-break/><text:span text:style-name="T1"> </text:span><text:span text:style-name="T2">(119/12) </text:span> [ⲁⲩⲱ] ϥ̣ϣⲟⲟⲡ’ ⲛϭⲓ ⲡⲓⲕ̅ⲗ̅ⲥ̅ ⲉⲁϥ‐ <text:line-break/><text:span text:style-name="T1"> </text:span><text:span text:style-name="T2">(119/13) </text:span> [....]. ⲙⲛ ⲧⲉϥⲉ̅ⲓ̅ⲇ̅ⲉ̅ⲁ̅· ⲁⲩⲱ <text:line-break/><text:span text:style-name="T1"> </text:span><text:span text:style-name="T2">(119/14) </text:span> [ϥϣⲟⲟ]ⲡ’ ⲛⲛ ⲁⲧⲟⲩⲱⲛϩ ⲛ ⲛⲁⲓ̈ <text:line-break/><text:span text:style-name="T1"> </text:span><text:span text:style-name="T2">(119/15) </text:span> [ⲧⲏⲣ]ⲟⲩ ϩⲓⲛⲁ ϫⲉ ⲉⲩⲉϫⲓ ϭⲟⲙ <text:line-break/><text:soft-page-break/><text:span text:style-name="T1"> </text:span><text:span text:style-name="T2">(119/16) </text:span> [ⲉⲃⲟ]ⲗ ϩⲓ̣[ⲧ]ⲟ̣ⲟⲧϥ ⲧⲏⲣⲟⲩ ⲉⲩ‐ <text:line-break/><text:span text:style-name="T1"> </text:span><text:span text:style-name="T2">(119/17) </text:span> [..]ⲥ̣ⲧⲉ̣ ⲉ̣ϥϣⲟⲟⲡ’ [ⲛ]ϩⲣⲁⲓ̈ ϩⲙ <text:line-break/><text:span text:style-name="T1"> </text:span><text:span text:style-name="T2">(119/18) </text:span> [...]ⲱ. ⲙ ⲡⲁⲛⲧⲉⲗⲓⲟⲥ ⲉⲩⲛ‐ <text:line-break/><text:span text:style-name="T1"> </text:span><text:span text:style-name="T2">(119/19) </text:span> [ⲧⲁϥ ⲙ ⲡⲓ]ϥⲧⲟⲟⲩ ⲉⲩϣⲟⲟⲡ’ <text:line-break/><text:span text:style-name="T1"> </text:span><text:span text:style-name="T2">(119/20) </text:span> [..... ⲁ]ⲩⲱ ⲡⲓϣⲟⲣⲡ’ ⲛⲓ‐ <text:line-break/><text:span text:style-name="T1"> </text:span><text:span text:style-name="T2">(119/21) </text:span> [..... ⲟ]ⲩⲇⲉ ⲕⲁⲧⲁ ⲟⲩϩⲱ‐ <text:line-break/><text:span text:style-name="T1"> </text:span><text:span text:style-name="T2">(119/22) </text:span> [.....]ⲏϩ ⲉⲣⲟϥ ⲙⲁ̣ⲩⲁⲁ[ϥ] <text:line-break/><text:span text:style-name="T1"> </text:span><text:span text:style-name="T2">(119/23) </text:span> [.... ⲃ̅]̅ⲁ̣̅̅ⲣ̅ⲃ̅ⲏ̅ⲗ̅ⲱ̣̅̅ [....]ⲏ ⲇ̣[..]. <text:line-break/><text:span text:style-name="T1"> </text:span><text:span text:style-name="T2">(119/24) </text:span> [......]ⲡⲧ̣[......... <text:line-break/><text:span text:style-name="T1"> </text:span><text:span text:style-name="T2">(119/25) </text:span> [......]ⲫⲱ̣[........ <text:line-break/><text:span text:style-name="T1"> </text:span><text:span text:style-name="T2">(120/1) </text:span> ⲉⲓⲙⲉ ⲉⲣⲟϥ ⲙⲛ ⲡⲏ ⲉⲧ’ⲕⲏ ⲉ‐ <text:line-break/><text:span text:style-name="T1"> </text:span><text:span text:style-name="T2">(120/2) </text:span> ϩⲣⲁⲓ̈ ⲉⲩⲙⲉϩⲥⲛⲁⲩ· ⲡⲓϣⲟⲣⲡ’ <text:line-break/><text:span text:style-name="T1"> </text:span><text:span text:style-name="T2">(120/3) </text:span> ⲇⲉ ⲛⲧⲉ ⲛⲓⲉⲱⲛ ⲡⲉ ϩⲁⲣⲙⲏⲇⲱⲛ <text:line-break/><text:span text:style-name="T1"> </text:span><text:span text:style-name="T2">(120/4) </text:span> ⲡⲓⲉⲟⲟⲩ ⲛ ⲉⲓⲱⲧ’ ⲡⲓⲙⲉ̣[ϩ]ⲥ̣ⲛⲁ̣ⲩ̣ <text:line-break/><text:span text:style-name="T1"> </text:span><text:span text:style-name="T2">(120/5) </text:span> ⲇⲉ ⲙ ⲫⲱⲥⲧⲏⲣ ⲡⲏ ⲉⲧ̣[ⲉ ⲛϥⲉⲓⲙⲉ] <text:line-break/><text:span text:style-name="T1"> </text:span><text:span text:style-name="T2">(120/6) </text:span> ⲉⲣⲟϥ ⲁⲛ· ⲁⲗⲗⲁ ⲛⲓⲕⲁ̣ⲧ̣[ⲁ ⲟⲩⲁ ⲧⲏ]‐ <text:line-break/><text:span text:style-name="T1"> </text:span><text:span text:style-name="T2">(120/7) </text:span> ⲣⲟⲩ ⲟⲩⲥⲟⲫⲓⲁ ⲛ [......]ϣⲟ‐ <text:line-break/><text:span text:style-name="T1"> </text:span><text:span text:style-name="T2">(120/8) </text:span> ⲟⲡ’ ϩⲙ ⲡⲓⲙⲉϩϥⲧⲟ[ⲟⲩ ⲛⲛ ⲉⲱ]ⲛ· <text:line-break/><text:span text:style-name="T1"> </text:span><text:span text:style-name="T2">(120/9) </text:span> ⲡⲏ ⲉⲧⲁϥⲟⲩⲱⲛϩ ⲉⲃ[ⲟⲗ ⲙⲙⲟϥ] <text:line-break/><text:span text:style-name="T1"> </text:span><text:span text:style-name="T2">(120/10) </text:span> ⲙⲛ ⲛⲓⲉⲟⲟⲩ ⲧⲏⲣⲟⲩ [ⲡⲓⲙⲉϩϣⲟ]‐ <text:line-break/><text:span text:style-name="T1"> </text:span><text:span text:style-name="T2">(120/11) </text:span> ⲙⲧ’ ⲇⲉ ⲙ ⲫⲱⲥⲧⲏⲣ ⲡⲏ̣ ⲉ̣[....] <text:line-break/><text:span text:style-name="T1"> </text:span><text:span text:style-name="T2">(120/12) </text:span> ⲉⲣⲟϥ ⲁⲛ· ⲉⲡⲓϣⲁϫⲉ ⲛⲧ[ⲉ ⲛⲓⲉⲓ]‐ <text:line-break/><text:span text:style-name="T1"> </text:span><text:span text:style-name="T2">(120/13) </text:span> ⲇⲟⲥ ⲧⲏⲣⲟⲩ ⲙⲛ ⲡⲓⲕⲉⲉ̣[ⲟⲟⲩ] <text:line-break/><text:span text:style-name="T1"> </text:span><text:span text:style-name="T2">(120/14) </text:span> ⲉⲧⲙⲙⲁⲩ ϯⲉⲡⲓⲥⲧⲏⲙ[ⲏ ⲧⲏ ⲉⲧ]‐ <text:line-break/><text:span text:style-name="T1"> </text:span><text:span text:style-name="T2">(120/15) </text:span> ⲛϩⲣⲁⲓ̈ ϩⲙ ⲡⲓⲙⲉϩϣⲟⲙⲧ’ ⲛ̣[ⲛ ⲉⲱⲛ] <text:line-break/><text:span text:style-name="T1"> </text:span><text:span text:style-name="T2">(120/16) </text:span> ⲟⲩⲛ ϥⲧⲟⲟⲩ ϣⲟⲟⲡ’ ⲛ̣ϩⲣ[ⲁⲓ̈ ⲛ]‐ <text:line-break/><text:span text:style-name="T1"> </text:span><text:span text:style-name="T2">(120/17) </text:span> ϩⲏⲧϥ· ⲙ̅ⲁ̅ⲗ̅ⲥ̅ⲏ̅ⲇ̅ⲱ̅ⲛ̣̅̅[·] ⲙⲛ ⲙ[.. <text:line-break/><text:span text:style-name="T1"> </text:span><text:span text:style-name="T2">(120/18) </text:span> ⲛⲓⲟⲥ· ⲡ̣[ⲓ]ⲙⲉϩϥⲧⲟ̣ⲟ̣ⲩ ⲇ[ⲉ ⲙ ⲫⲱ]‐ <text:line-break/><text:span text:style-name="T1"> </text:span><text:span text:style-name="T2">(120/19) </text:span> ⲥⲧⲏⲣ ⲡⲉ ⲡⲏ ⲉⲧⲛⲁⲩ̣ [ⲉ]ⲣ̣[ⲟ <text:line-break/><text:span text:style-name="T1"> </text:span><text:span text:style-name="T2">(120/20) </text:span> ⲛⲧⲉ ⲛⲓⲉⲓⲇⲟⲥ ⲧⲏ̣ⲣ̣ⲟ̣[ⲩ.... <text:line-break/><text:span text:style-name="T1"> </text:span><text:span text:style-name="T2">(120/21) </text:span> ϩⲓ ⲟⲩⲙⲁ ⲉⲩϣⲟ̣[ⲟⲡ’ <text:line-break/><text:span text:style-name="T1"> </text:span><text:span text:style-name="T2">(120/22) </text:span> ⲟⲩⲥⲃⲱ ⲙⲛ ⲟⲩⲉⲟⲟ̣[ⲩ.... <text:line-break/><text:span text:style-name="T1"> </text:span><text:span text:style-name="T2">(120/23) </text:span> ⲙⲛ̣ ⲧⲙⲉ ⲛⲧⲉ ⲡⲓϥⲧ[ⲟⲟⲩ ⲛⲛ ⲉⲱⲛ] <text:line-break/><text:span text:style-name="T1"> </text:span><text:span text:style-name="T2">(120/24) </text:span> ⲟ̣̅[ⲗ̅]ⲙ̅ⲓ̅ⲥ̣̅ [...] ⲙ̣ⲛ ⲡⲓⲁ[..... <text:line-break/><text:span text:style-name="T1"> </text:span><text:span text:style-name="T2">(120/25) </text:span> [ ] ϩⲓ [...... <text:line-break/><text:span text:style-name="T1"> </text:span><text:span text:style-name="T2">(120/26) </text:span> [ ]ⲟⲱ̣[...... <text:line-break/><text:span text:style-name="T1"> </text:span><text:span text:style-name="T2">(121/1) </text:span> ⲙⲉϩϯⲟⲩ· ⲁⲩⲱ ⲡⲓϣⲟⲣⲡ’ ⲉ‐ <text:line-break/><text:span text:style-name="T1"> </text:span><text:span text:style-name="T2">(121/2) </text:span> ⲧⲉ ⲡⲓⲙⲉϩⲥⲛⲁⲩ ⲡⲉ ⲉⲧⲉ ⲡⲁⲓ̈ <text:line-break/><text:span text:style-name="T1"> </text:span><text:span text:style-name="T2">(121/3) </text:span> ⲡⲉ ⲛⲧⲟϥ ⲡⲉ ⲡⲓⲕ̅ⲗ̅ⲥ̅ ⲙ ⲡⲁⲛⲧⲉⲗⲓⲟⲥ <text:line-break/><text:span text:style-name="T1"> </text:span><text:span text:style-name="T2">(121/4) </text:span> ⲥⲉϣⲟ̣ⲟⲡ’ ⲅⲁⲣ ⲛϭⲓ ⲡⲓϥⲧⲟⲟⲩ ⲙ <text:line-break/><text:span text:style-name="T1"> </text:span><text:span text:style-name="T2">(121/5) </text:span> ⲫⲱⲥⲧ[ⲏ]ⲣ· ⲡⲓⲕⲗ̅ⲥ̅ ⲇⲉ ⲉⲧⲁϥⲡⲱϣ <text:line-break/><text:span text:style-name="T1"> </text:span><text:span text:style-name="T2">(121/6) </text:span> ⲟⲛ· ⲁⲩⲱ̣ ⲛⲁ̣ⲓ̈ ⲉⲩϣⲟⲟⲡ’ ϩⲓ ⲟⲩ‐ <text:line-break/><text:span text:style-name="T1"> </text:span><text:span text:style-name="T2">(121/7) </text:span> ⲙⲁ· ⲁⲩⲱ̣ [ⲛ]ⲁ̣ⲓ̈ ⲉⲧ’ⲥⲟⲟⲩⲛ ⲛⲉⲧ’‐ <text:line-break/><text:span text:style-name="T1"> </text:span><text:span text:style-name="T2">(121/8) </text:span> ϣⲟⲟⲡ’ ⲛ [ⲉ]ⲟⲟⲩ ⲧⲏⲣⲟⲩ· ⲛⲧⲟ‐ <text:line-break/><text:span text:style-name="T1"> </text:span><text:span text:style-name="T2">(121/9) </text:span> ⲟ̣[ⲩ ⲧⲏⲣⲟ]ⲩ ⲉⲩⲉ ⲛ ⲧⲉⲗⲓⲟⲥ· ⲡⲁⲓ̈ <text:line-break/><text:span text:style-name="T1"> </text:span><text:span text:style-name="T2">(121/10) </text:span> [....]ⲥ̣ⲟ̣ⲟⲩⲛ ⲛ ϩⲱⲃ ⲛⲓⲙ ⲛ‐ <text:line-break/><text:span text:style-name="T1"> </text:span><text:span text:style-name="T2">(121/11) </text:span> ⲧⲁⲩ ⲧⲏⲣⲟⲩ ⲉⲩⲡⲁⲛⲧⲉⲗⲓⲟⲥ <text:line-break/><text:soft-page-break/><text:span text:style-name="T1"> </text:span><text:span text:style-name="T2">(121/12) </text:span> ⲡⲉ· ⲉⲧⲉ ⲉⲃⲟⲗ ⲙⲙⲟϥ ⲡⲉ ϭⲟⲙ <text:line-break/><text:span text:style-name="T1"> </text:span><text:span text:style-name="T2">(121/13) </text:span> [ⲛ]ⲓⲙ· ⲁⲩⲱ ⲟⲩⲟⲛ ⲛⲓⲙ ⲙⲛ ⲡⲓ‐ <text:line-break/><text:span text:style-name="T1"> </text:span><text:span text:style-name="T2">(121/14) </text:span> ⲉⲱⲛ̣ ⲧⲏⲣϥ ⲛⲧⲁⲩ· ⲡⲏ ⲉϣⲁⲩ‐ <text:line-break/><text:span text:style-name="T1"> </text:span><text:span text:style-name="T2">(121/15) </text:span> [ⲉ]ⲓ̣ ⲉϩⲣⲁⲓ̈ ⲉⲣⲟϥ ⲧⲏⲣⲟⲩ· ⲁⲩⲱ <text:line-break/><text:span text:style-name="T1"> </text:span><text:span text:style-name="T2">(121/16) </text:span> ϣⲁⲩⲉⲓ ⲉⲃⲟⲗ ⲙⲙⲟϥ ⲛϭⲓ ⲛⲁⲓ̈ <text:line-break/><text:span text:style-name="T1"> </text:span><text:span text:style-name="T2">(121/17) </text:span> [ⲧⲏⲣ]ⲟⲩ· ϯϭⲟⲙ ⲛⲧⲉ̣ ⲛⲁⲓ̈ ⲧⲏ‐ <text:line-break/><text:span text:style-name="T1"> </text:span><text:span text:style-name="T2">(121/18) </text:span> [ⲣⲟ]ⲩ̣· ⲧⲁⲣⲭⲏ ⲛⲧⲉ ⲛⲁⲓ̈ ⲧⲏ‐ <text:line-break/><text:span text:style-name="T1"> </text:span><text:span text:style-name="T2">(121/19) </text:span> [ⲣⲟⲩ· ⲉ]ϣⲱⲡⲉ ⲉϥϣⲁⲛⲉⲓⲙⲉ <text:line-break/><text:span text:style-name="T1"> </text:span><text:span text:style-name="T2">(121/20) </text:span> [ⲙⲙⲟⲟⲩ] ⲁϥϣⲱⲡⲉ ⲛ ⲟⲩⲙⲉϩ‐ <text:line-break/><text:span text:style-name="T1"> </text:span><text:span text:style-name="T2">(121/21) </text:span> [.......]ⲉⲱⲛ· ⲙⲛ ⲟⲩⲙⲉϩ‐ <text:line-break/><text:span text:style-name="T1"> </text:span><text:span text:style-name="T2">(121/22) </text:span> [......]ⲙⲛⲧ’ⲁⲧ’ⲙⲓⲥⲉ· ⲉⲩ‐ <text:line-break/><text:span text:style-name="T1"> </text:span><text:span text:style-name="T2">(121/23) </text:span> [.....] ϩⲉⲛⲕⲉⲉⲱⲛ ϩⲣⲁ[ⲓ̈] <text:line-break/><text:span text:style-name="T1"> </text:span><text:span text:style-name="T2">(121/24) </text:span> [ϩⲛ...]ⲟⲩ.[......... <text:line-break/><text:span text:style-name="T1"> </text:span><text:span text:style-name="T2">(121/25) </text:span> [......]ⲟ[ <text:line-break/><text:span text:style-name="T1"> </text:span><text:span text:style-name="T2">(121/26) </text:span> [.....].ⲁ.[......... <text:line-break/><text:span text:style-name="T1"> </text:span><text:span text:style-name="T2">(122/1) </text:span> ϣⲱⲡⲉ ⲛⲛ ⲟⲩⲃ̅ⲁ̅ⲣ̅ⲃ̅ⲏ̅ⲗ̅ⲱ̅ ϣⲁϥ‐ <text:line-break/><text:span text:style-name="T1"> </text:span><text:span text:style-name="T2">(122/2) </text:span> ϣⲱⲡⲉ ⲛⲛ ⲟⲩϣⲟⲣⲡ’ ⲛⲛ ⲉⲱⲛ <text:line-break/><text:span text:style-name="T1"> </text:span><text:span text:style-name="T2">(122/3) </text:span> ⲉⲧⲃⲉ ϯⲙⲛⲧ’ϣⲁ ⲉⲛⲉϩ ⲛⲧⲉ ⲡⲓ‐ <text:line-break/><text:span text:style-name="T1"> </text:span><text:span text:style-name="T2">(122/4) </text:span> ⲁϩⲟⲣⲁⲧⲟⲛ ⲙ ⲡ̅ⲛ̅ⲁ̅· ϯⲙⲉϩⲥⲛⲧⲉ <text:line-break/><text:span text:style-name="T1"> </text:span><text:span text:style-name="T2">(122/5) </text:span> ⲙ ⲙⲛⲧ’ⲁⲧ’ⲙⲓⲥⲉ· ⲛⲓ̣[ⲉ]ⲟⲟⲩ ⲇⲉ <text:line-break/><text:span text:style-name="T1"> </text:span><text:span text:style-name="T2">(122/6) </text:span> ⲧⲏⲣⲟⲩ ⲛⲁⲓ̈ ⲛⲉ ⲛ̅ⲓ̅ⲁ̅ⲫ̅ⲣ̅ⲏ̅ⲇ̅ⲱ̅ⲛ̅ <text:line-break/><text:span text:style-name="T1"> </text:span><text:span text:style-name="T2">(122/7) </text:span> ⲛⲛ ⲁⲧⲛ ⲁⲣⲏϫⲛⲟⲩ̣ [. ⲛ]ⲓⲁⲧ’ϣⲁ‐ <text:line-break/><text:span text:style-name="T1"> </text:span><text:span text:style-name="T2">(122/8) </text:span> ϫⲉ ⲙⲙⲟⲟⲩ ⲛⲓⲣⲉϥⲟ[ⲩ]ⲱⲛϩ ⲉⲃⲟⲗ· <text:line-break/><text:span text:style-name="T1"> </text:span><text:span text:style-name="T2">(122/9) </text:span> ⲛⲓⲁⲧⲟⲩⲱⲧⲃ ⲉⲃⲟⲗ ⲛ[ⲓ......] <text:line-break/><text:span text:style-name="T1"> </text:span><text:span text:style-name="T2">(122/10) </text:span> ⲧⲏⲣⲟⲩ· ⲛⲓⲣⲉϥⲟⲩⲉⲛϩ ⲉⲟⲟⲩ ⲉⲃⲟⲗ <text:line-break/><text:span text:style-name="T1"> </text:span><text:span text:style-name="T2">(122/11) </text:span> ⲛ̅ⲓ̅ⲙ̅ⲁ̅ⲣ̅ⲝ̅ⲏ̅ⲇ̅ⲱ̅ⲛ̅· ⲛⲏ ⲉⲧⲟⲩⲟⲛϩ ⲉ‐ <text:line-break/><text:span text:style-name="T1"> </text:span><text:span text:style-name="T2">(122/12) </text:span> ⲃⲟⲗ ⲉⲩⲕⲏⲃ· ⲛ̅ⲓ̅ⲥ̅ⲟ̅ⲗ̅ⲙ̅ⲓ̅ⲥ̅ ⲛⲓⲁⲧ[ⲛ] <text:line-break/><text:span text:style-name="T1"> </text:span><text:span text:style-name="T2">(122/13) </text:span> ⲁⲣⲏϫⲛⲟⲩ· ⲛⲓⲟⲩⲱⲛϩ ⲉ̣ⲃⲟⲗ ⲙ‐ <text:line-break/><text:span text:style-name="T1"> </text:span><text:span text:style-name="T2">(122/14) </text:span> ⲙⲟⲟⲩ ⲙⲁⲩⲁⲁⲩ· ⲛⲏ ⲉⲧ’ⲙⲉ[ϩ] <text:line-break/><text:span text:style-name="T1"> </text:span><text:span text:style-name="T2">(122/15) </text:span> ⲉⲃⲟⲗ ⲛⲛ ⲉⲟⲟⲩ· ⲛⲏ ⲉⲧⲟϩ[ⲉ ⲉ] <text:line-break/><text:span text:style-name="T1"> </text:span><text:span text:style-name="T2">(122/16) </text:span> ⲉⲟⲟⲩ[· ⲛ]ⲓⲣⲉϥⲥⲙⲟⲩ ⲛⲓⲙ[ⲁⲣⲥⲏ]‐ <text:line-break/><text:span text:style-name="T1"> </text:span><text:span text:style-name="T2">(122/17) </text:span> ⲇⲱⲛ· ⲛⲓⲕ̅ⲗ̅ⲥ̅ ⲛⲏ ⲉⲧ̣[..... <text:line-break/><text:span text:style-name="T1"> </text:span><text:span text:style-name="T2">(122/18) </text:span> ⲉⲃⲟⲗ· ⲛⲓⲁⲣⲏϫⲛⲟⲩ ⲛ[ⲏⲉⲧⲕⲏ] <text:line-break/><text:span text:style-name="T1"> </text:span><text:span text:style-name="T2">(122/19) </text:span> ϩⲓϫⲛ ⲛⲓⲁⲣⲏϫⲛⲟⲩ [........ <text:line-break/><text:span text:style-name="T1"> </text:span><text:span text:style-name="T2">(122/20) </text:span> ⲉⲩⲉ ⲛⲏ ⲉⲧ’ϣⲟⲟⲡ’ ϩ[ⲛ.... <text:line-break/><text:span text:style-name="T1"> </text:span><text:span text:style-name="T2">(122/21) </text:span> ⲉ̣ⲩⲉ· .....ⲧⲁϩ.[..... <text:line-break/><text:span text:style-name="T1"> </text:span><text:span text:style-name="T2">(122/22) </text:span> [ ].[...... <text:line-break/><text:span text:style-name="T1"> </text:span><text:span text:style-name="T2">(122/23) </text:span> [ ]ⲙ.[...... <text:line-break/><text:span text:style-name="T1"> </text:span><text:span text:style-name="T2">(122/24) </text:span> (Missing 1 - 2 lines.) <text:line-break/><text:span text:style-name="T1"> </text:span><text:span text:style-name="T2">(123/1) </text:span> ⲙⲙⲁⲩ ⲛ ϩⲉⲛⲁⲛⲧⲃⲁ ⲛⲛ ⲉⲟⲟⲩ <text:line-break/><text:span text:style-name="T1"> </text:span><text:span text:style-name="T2">(123/2) </text:span> ⲛϩⲣⲁⲓ̈ ⲛϩⲏⲧⲟⲩ· ⲉⲧⲃⲉ ⲡⲁⲓ̈ ⲟⲩ‐ <text:line-break/><text:span text:style-name="T1"> </text:span><text:span text:style-name="T2">(123/3) </text:span> ⲉⲟⲟⲩ ⲉϥϫⲏⲕ ⲡⲉ ϩⲓⲛⲁ ⲉϣⲱⲡⲉ <text:line-break/><text:span text:style-name="T1"> </text:span><text:span text:style-name="T2">(123/4) </text:span> ⲉϥϣⲁⲛϭⲙϭⲟⲙ ⲉ ⲛⲟⲩϩⲃ ⲁⲩⲱ <text:line-break/><text:span text:style-name="T1"> </text:span><text:span text:style-name="T2">(123/5) </text:span> ⲛϥⲁⲙⲁϩⲧⲉ ⲛϥϣⲱⲡⲉ ⲛ ⲧⲉⲗⲓⲟⲥ <text:line-break/><text:span text:style-name="T1"> </text:span><text:span text:style-name="T2">(123/6) </text:span> ⲉⲧⲃⲉ ⲡⲁⲓ̈ ⲕⲁⲛ ⲉϥϣⲁⲛⲉⲓ ⲉϩⲣⲁⲓ̈ <text:line-break/><text:span text:style-name="T1"> </text:span><text:span text:style-name="T2">(123/7) </text:span> ⲉⲩⲥⲱⲙⲁ̣ ⲙⲛ ⲟⲩ〈ⲟⲩ〉ⲱⲧⲃ ⲉⲃⲟⲗ ⲛ‐ <text:line-break/><text:span text:style-name="T1"> </text:span><text:span text:style-name="T2">(123/8) </text:span> ⲧⲉ ⲟⲩϩⲩ̣ⲗⲏ ⲉⲧⲃⲉ ⲧⲟⲩⲙⲛⲧ’‐ <text:line-break/><text:soft-page-break/><text:span text:style-name="T1"> </text:span><text:span text:style-name="T2">(123/9) </text:span> ⲡⲁⲛ[ⲧ]ⲉ̣[ⲗⲓ]ⲟⲥ ⲙⲁⲩϫⲓ ⲛ ⲟⲩⲧⲁⲉⲓⲟ <text:line-break/><text:span text:style-name="T1"> </text:span><text:span text:style-name="T2">(123/10) </text:span> ⲛϩⲟⲩⲟ· ⲉⲧⲉ ⲉⲃⲟⲗ ⲙⲙⲟϥ ⲡⲉ <text:line-break/><text:span text:style-name="T1"> </text:span><text:span text:style-name="T2">(123/11) </text:span> ⲛⲁⲓ̈ ⲧⲏⲣⲟⲩ ⲉⲩϫⲏⲕ ⲉⲃⲟⲗ ⲙⲛ <text:line-break/><text:span text:style-name="T1"> </text:span><text:span text:style-name="T2">(123/12) </text:span> [ⲛ]ⲏ ⲉⲧⲛⲙⲙⲁϥ· ⲕⲁⲓⲅⲁⲣ ⲡⲟⲩⲁ <text:line-break/><text:span text:style-name="T1"> </text:span><text:span text:style-name="T2">(123/13) </text:span> ⲡⲟⲩⲁ ⲛⲧⲉ ⲛⲓⲉⲱⲛ ⲟⲩⲛⲧⲁϥ ⲙ‐ <text:line-break/><text:span text:style-name="T1"> </text:span><text:span text:style-name="T2">(123/14) </text:span> [ⲙ]ⲁⲩ ⲛ ϩⲉⲛⲁⲛⲧⲃⲁ ⲛⲛ ⲉⲱⲛ ⲛ‐ <text:line-break/><text:span text:style-name="T1"> </text:span><text:span text:style-name="T2">(123/15) </text:span> ϩⲣⲁⲓ̈ ⲛϩⲏⲧϥ ϩⲓⲛⲁ ⲉϥϣⲟⲟⲡ’ ϩⲓ ⲟⲩ‐ <text:line-break/><text:span text:style-name="T1"> </text:span><text:span text:style-name="T2">(123/16) </text:span> ⲙⲁ ϫⲉ ⲉϥⲉϣⲱⲡⲉ ⲛⲛ ⲟⲩⲉⲱⲛ <text:line-break/><text:span text:style-name="T1"> </text:span><text:span text:style-name="T2">(123/17) </text:span> ⲛ ⲧⲉⲗ̣ⲓⲟⲥ· ⲉϥϣⲟⲟⲡ’ ⲇⲉ ϩⲛ ϯ‐ <text:line-break/><text:span text:style-name="T1"> </text:span><text:span text:style-name="T2">(123/18) </text:span> [ⲙⲛⲧ’ⲙ]ⲁ̣[ⲕ]ⲁⲣⲓⲟⲥ ⲛⲧⲉ ⲡⲓϣⲙⲧ’‐ <text:line-break/><text:span text:style-name="T1"> </text:span><text:span text:style-name="T2">(123/19) </text:span> [ϭⲟⲙ ⲛ ⲧⲉ]ⲗⲓⲟⲥ ⲛ ⲁϩⲟⲣⲁⲧⲟⲛ <text:line-break/><text:span text:style-name="T1"> </text:span><text:span text:style-name="T2">(123/20) </text:span> [ⲙ ⲡ̅ⲛ̅ⲁ̅ ...]ⲱϥ ⲙ ⲡⲓⲕⲁ ⲣⲱϥ ⲛ <text:line-break/><text:span text:style-name="T1"> </text:span><text:span text:style-name="T2">(123/21) </text:span> [........]ⲧⲉ ⲉⲧⲟⲩⲣ ϣⲟⲣⲡ’ <text:line-break/><text:span text:style-name="T1"> </text:span><text:span text:style-name="T2">(123/22) </text:span> [.......]ⲟϥ· ⲙⲛ ϯ[ⲅ]ⲛ̣ⲱⲥⲓⲥ̣ <text:line-break/><text:span text:style-name="T1"> </text:span><text:span text:style-name="T2">(123/23) </text:span> [.......]ⲡ.[ <text:line-break/><text:span text:style-name="T1"> </text:span><text:span text:style-name="T2">(123/24) </text:span> [........] ⲙ [ <text:line-break/><text:span text:style-name="T1"> </text:span><text:span text:style-name="T2">(123/25) </text:span> [........].[ <text:line-break/><text:span text:style-name="T1"> </text:span><text:span text:style-name="T2">(124/1) </text:span> ⲧⲏⲣϥ ⲟⲩⲥⲓⲅⲏ ⲛⲧⲉ ϯⲅⲛⲱⲥⲓⲥ ⲙ <text:line-break/><text:span text:style-name="T1"> </text:span><text:span text:style-name="T2">(124/2) </text:span> ⲙⲉϩⲥⲛⲧⲉ· ⲡⲓϣⲟⲣⲡ’ ⲙ ⲙⲉⲉⲩⲉ <text:line-break/><text:span text:style-name="T1"> </text:span><text:span text:style-name="T2">(124/3) </text:span> ⲛϩⲣⲁⲓ̈ ϩⲛ ⲟⲩϯ ⲙⲉⲧⲉ ⲛⲧⲉ ⲡⲓϣⲙⲧ’‐ <text:line-break/><text:span text:style-name="T1"> </text:span><text:span text:style-name="T2">(124/4) </text:span> ϭⲟⲙ ϫⲉ ⲁϥⲟⲩⲉϩ ⲥⲁϩⲛⲉ ⲛⲁⲥ ⲉ ⲧⲣⲉⲥ‐ <text:line-break/><text:span text:style-name="T1"> </text:span><text:span text:style-name="T2">(124/5) </text:span> ⲉⲓⲙⲉ ⲉⲣⲟϥ· ϩⲓⲛⲁ ϫⲉ ⲉϥⲉϣⲱⲡⲉ <text:line-break/><text:span text:style-name="T1"> </text:span><text:span text:style-name="T2">(124/6) </text:span> ⲙ ⲡⲁⲛⲧⲉⲗⲓⲟⲥ· ⲁⲩⲱ ⲉϥⲉ ⲛ ⲧⲉⲗⲓⲟⲥ <text:line-break/><text:span text:style-name="T1"> </text:span><text:span text:style-name="T2">(124/7) </text:span> ⲛϩⲣⲁⲓ̈ ⲛϩⲏⲧϥ· ⲉⲩⲉⲓⲙ̣ⲉ ⲉⲣⲟϥ ⲉⲃⲟⲗ <text:line-break/><text:span text:style-name="T1"> </text:span><text:span text:style-name="T2">(124/8) </text:span> ϩⲓⲧⲟⲟⲧⲥ ⲛ ⲟⲩⲙⲛⲧϩⲁ̣ⲡⲗⲟⲩⲥ ⲙⲛ <text:line-break/><text:span text:style-name="T1"> </text:span><text:span text:style-name="T2">(124/9) </text:span> ⲟⲩⲙⲛⲧⲙⲁⲕⲁⲣⲓⲟⲥ· ⲁ̣[ⲓ̈ϫⲓ] ⲛ̣ ⲟ̣ⲩ̣ⲙⲛⲧ’‐ <text:line-break/><text:span text:style-name="T1"> </text:span><text:span text:style-name="T2">(124/10) </text:span> ⲁⲅⲁⲑⲟⲥ ⲉⲃⲟⲗ ϩⲓⲧⲟⲟⲧϥ ⲙ ⲡⲏ ⲉⲧⲟⲩ‐ <text:line-break/><text:span text:style-name="T1"> </text:span><text:span text:style-name="T2">(124/11) </text:span> ⲏϩ ⲛⲥⲱϥ ⲛⲧⲉ ⲡⲓⲉⲱⲛ ⲛ ⲃⲁ̅ⲣ̅ⲃ̅ⲏ̅ⲗ̅ⲱ̅ <text:line-break/><text:span text:style-name="T1"> </text:span><text:span text:style-name="T2">(124/12) </text:span> ⲡⲏ ⲉⲧ’ϯ ⲙ ⲡϣⲱⲡⲉ ⲛⲁϥ· ⲛⲉ.[ <text:line-break/><text:span text:style-name="T1"> </text:span><text:span text:style-name="T2">(124/13) </text:span> ⲧⲱϥ ⲁⲛ ⲧⲉ ϯϭⲟⲙ ⲁⲗⲗⲁ ⲧⲁ ⲡⲏ ⲉⲧⲙ‐ <text:line-break/><text:span text:style-name="T1"> </text:span><text:span text:style-name="T2">(124/14) </text:span> ⲙⲁⲩ ⲧⲉ· ⲛⲓⲉⲱⲛ ⲇⲉ ⲉⲧ’ϣⲟⲟⲡ̣ <text:line-break/><text:span text:style-name="T1"> </text:span><text:span text:style-name="T2">(124/15) </text:span> ⲟⲛⲧⲱⲥ ⲉⲩϣⲟⲟⲡ’̣ ϩⲛ ⲟⲩⲥⲓⲅⲏ <text:line-break/><text:span text:style-name="T1"> </text:span><text:span text:style-name="T2">(124/16) </text:span> ⲛⲉⲟⲩⲁⲧⲉⲛⲉⲣⲅⲓⲁ ⲧⲉ ϯϩⲩⲡⲁⲣⲝⲓⲥ̣ <text:line-break/><text:span text:style-name="T1"> </text:span><text:span text:style-name="T2">(124/17) </text:span> ⲁⲩⲱ ⲛⲉⲟⲩⲁⲧ’ϣⲁϫⲉ ⲙⲙⲟ̣ⲥ̣ ⲧ̣ⲉ̣ <text:line-break/><text:span text:style-name="T1"> </text:span><text:span text:style-name="T2">(124/18) </text:span> ϯⲅⲛⲱⲥⲓⲥ ⲛⲧⲉ ⲡⲓⲕ̅ⲗ̅[̅ⲥ̅ ⲉⲧⲧⲁ]‐ <text:line-break/><text:span text:style-name="T1"> </text:span><text:span text:style-name="T2">(124/19) </text:span> ϩⲟ ⲙⲙⲟϥ· ⲉⲁϥⲉⲓ ⲉ[ⲃⲟⲗ ϩⲙ ⲡⲓ]‐ <text:line-break/><text:span text:style-name="T1"> </text:span><text:span text:style-name="T2">(124/20) </text:span> ⲙⲉϩϥⲧⲟⲟⲩ ⲡⲓⲙⲟ̣[....... <text:line-break/><text:span text:style-name="T1"> </text:span><text:span text:style-name="T2">(124/21) </text:span> ⲙⲉⲉⲩⲉ ⲡⲓⲡⲣⲱⲧⲟ[ⲫⲁⲛⲏⲥ ⲛ] <text:line-break/><text:span text:style-name="T1"> </text:span><text:span text:style-name="T2">(124/22) </text:span> ϩⲟ[ⲟ]ⲩⲧ’ ⲛ̣ ⲧⲉ̣ⲗ̣ⲓ̣ⲟ̣ⲥ̣ ⲛ [ⲛⲟⲩⲥ.. <text:line-break/><text:span text:style-name="T1"> </text:span><text:span text:style-name="T2">(124/23) </text:span> [ ]ⲇⲱ̣[....... <text:line-break/><text:span text:style-name="T1"> </text:span><text:span text:style-name="T2">(124/24) </text:span> [ ]. ⲛ [....... <text:line-break/><text:span text:style-name="T1"> </text:span><text:span text:style-name="T2">(125/1) </text:span> ϩⲓⲕⲱⲛ ⲛⲧⲁϥ ⲡⲉ ⲉϥϣⲏϣ ⲛⲙ‐ <text:line-break/><text:span text:style-name="T1"> </text:span><text:span text:style-name="T2">(125/2) </text:span> ⲙⲁϥ ϩⲙ ⲡⲓⲉⲟⲟⲩ ⲙⲛ̣ ϯϭⲟⲙ· ϩⲛ <text:line-break/><text:span text:style-name="T1"> </text:span><text:span text:style-name="T2">(125/3) </text:span> ⲟⲩⲧⲁⲝⲓⲥ ⲇⲉ ⲉϥϫⲟⲥⲉ ⲉⲣⲟϥ <text:line-break/><text:span text:style-name="T1"> </text:span><text:span text:style-name="T2">(125/4) </text:span> ⲁⲩⲱ ⲛϩⲣⲁⲓ̈ ϩⲛ ⲟⲩⲉⲱⲛ ⲁⲛ· <text:line-break/><text:span text:style-name="T1"> </text:span><text:span text:style-name="T2">(125/5) </text:span> ⲉⲩⲛⲧⲁϥ ⲛ ⲛⲁⲓ̈ ⲧⲏⲣⲟⲩ ⲙ ⲡⲣⲏⲧⲉ <text:line-break/><text:span text:style-name="T1"> </text:span><text:span text:style-name="T2">(125/6) </text:span> ⲙ ⲡⲏ ⲉⲩⲟⲛϩ ⲉⲩϣⲟⲟⲡ’ ϩⲓ ⲟⲩⲙⲁ <text:line-break/><text:soft-page-break/><text:span text:style-name="T1"> </text:span><text:span text:style-name="T2">(125/7) </text:span> ⲛϩⲣⲁⲓ̈ ϩⲛ ⲟⲩⲁ· ⲙⲛ ⲡⲓⲉⲱⲛ ⲉⲧ’‐ <text:line-break/><text:span text:style-name="T1"> </text:span><text:span text:style-name="T2">(125/8) </text:span> ϩⲣⲁⲓ̈ ϩ[ⲛⲛ ⲛ]ⲉⲱⲛ ⲉⲩⲛⲧⲁϥ ⲙⲙⲁⲩ <text:line-break/><text:span text:style-name="T1"> </text:span><text:span text:style-name="T2">(125/9) </text:span> ⲛ ⲟⲩⲇⲓ̣[ⲁ]ⲫⲟⲣⲁ ⲉⲥⲉ ⲛ ϥⲧⲟⲟⲩ <text:line-break/><text:span text:style-name="T1"> </text:span><text:span text:style-name="T2">(125/10) </text:span> ⲙⲛ ⲛ̣[ⲓ]ⲕ̣ⲉϣⲱϫⲡ’ ⲧⲏⲣⲟⲩ ⲉⲧ’‐ <text:line-break/><text:span text:style-name="T1"> </text:span><text:span text:style-name="T2">(125/11) </text:span> ϣⲟⲟⲡ’ ϩⲙ̣ ⲡⲓⲙⲁ ⲉ̣ⲧⲙⲙⲁⲩ· ⲡⲓ‐ <text:line-break/><text:span text:style-name="T1"> </text:span><text:span text:style-name="T2">(125/12) </text:span> ⲕⲗ̅ⲥ̅ ⲇⲉ ⲉϥϣⲟⲟⲡ’ ⲟⲛⲧⲱⲥ ⲉⲥ‐ <text:line-break/><text:span text:style-name="T1"> </text:span><text:span text:style-name="T2">(125/13) </text:span> ⲕⲏ ⲇⲉ ⲛⲙⲙⲁϥ ⲛϭⲓ ⲧⲁ ⲛⲓⲉⲟⲟⲩ <text:line-break/><text:span text:style-name="T1"> </text:span><text:span text:style-name="T2">(125/14) </text:span> ⲧⲏⲣⲟⲩ ⲓ̈ⲟ̅ⲩ̅ⲏ̅ⲗ̅· ⲡⲓⲉⲟⲟⲩ ⲛ ϩⲟ‐ <text:line-break/><text:span text:style-name="T1"> </text:span><text:span text:style-name="T2">(125/15) </text:span> ⲟ̣ⲩⲧ’ ⲙ ⲡⲁⲣⲑⲉⲛⲟⲥ· ⲉⲧⲉ ⲉ‐ <text:line-break/><text:span text:style-name="T1"> </text:span><text:span text:style-name="T2">(125/16) </text:span> ⲃⲟⲗ ϩⲓⲧⲟⲟⲧⲥ ⲁⲩⲛⲁⲩ ⲉ ⲛⲓⲡⲁⲛ‐ <text:line-break/><text:span text:style-name="T1"> </text:span><text:span text:style-name="T2">(125/17) </text:span> ⲧⲉⲗⲓⲟⲛ ⲧⲏⲣⲟⲩ· ⲛⲉⲧⲁϩⲉ ⲇⲉ <text:line-break/><text:span text:style-name="T1"> </text:span><text:span text:style-name="T2">(125/18) </text:span> [ⲉⲣ]ⲁⲧⲟⲩ ⲛⲛⲁϩⲣⲁϥ ⲡⲉ ⲡⲓϣⲟⲙⲧ’‐ <text:line-break/><text:span text:style-name="T1"> </text:span><text:span text:style-name="T2">(125/19) </text:span> [....].[.]. ⲛ ⲁⲗⲟⲩ· ⲡⲓϣⲙⲧ’‐ <text:line-break/><text:span text:style-name="T1"> </text:span><text:span text:style-name="T2">(125/20) </text:span> [......]ⲥ̣ ⲡⲓⲁⲩⲧⲟⲅⲉⲛⲏⲥ ⲛ <text:line-break/><text:span text:style-name="T1"> </text:span><text:span text:style-name="T2">(125/21) </text:span> [......] ⲉⲩⲛⲧⲁϥ ⲇⲉ ⲙⲙⲁⲩ <text:line-break/><text:span text:style-name="T1"> </text:span><text:span text:style-name="T2">(125/22) </text:span> [.......] ⲛϩⲣⲁⲓ̈ ϩⲛ ⲟⲩⲁ ⲉϥⲧⲟ‐ <text:line-break/><text:span text:style-name="T1"> </text:span><text:span text:style-name="T2">(125/23) </text:span> [.... ⲡ]ⲏ ⲟⲛ ⲉⲧⲁⲙⲁϩⲧⲉ ⲉ ⲡⲓ‐ <text:line-break/><text:span text:style-name="T1"> </text:span><text:span text:style-name="T2">(125/24) </text:span> [......] ⲉϥϣⲟⲟ̣ⲡ’ ϩⲛ̣ [ <text:line-break/><text:span text:style-name="T1"> </text:span><text:span text:style-name="T2">(125/25) </text:span> [.......]ϭⲁ[ <text:line-break/><text:span text:style-name="T1"> </text:span><text:span text:style-name="T2">(126/1) </text:span> ⲡⲉ ⲛⲧⲉ ϩⲉⲛⲁⲛⲧⲃⲁ ⲛ ⲕⲱⲃ· ⲡⲓ‐ <text:line-break/><text:span text:style-name="T1"> </text:span><text:span text:style-name="T2">(126/2) </text:span> ϣⲟⲣⲡ’ ⲇⲉ ⲛⲛ ⲉⲱⲛ ⲉⲧ’ϣⲟⲟⲡ’ <text:line-break/><text:span text:style-name="T1"> </text:span><text:span text:style-name="T2">(126/3) </text:span> ⲛϩⲏⲧϥ ⲉⲧⲉ ⲉⲃⲟⲗ ⲙⲙⲟϥ ⲡⲉ <text:line-break/><text:span text:style-name="T1"> </text:span><text:span text:style-name="T2">(126/4) </text:span> ⲡⲓϣⲟⲣⲡ’ ⲙ ⲫⲱⲥⲧⲏⲣ· ⲥ̅ⲟ̅ⲗ̅ⲙ̅ⲓ̅ⲥ̅ <text:line-break/><text:span text:style-name="T1"> </text:span><text:span text:style-name="T2">(126/5) </text:span> ⲙⲛ ⲡⲓⲣⲉϥⲟⲩⲉⲛϩ ⲛⲟⲩⲧⲉ ⲉⲃⲟⲗ <text:line-break/><text:span text:style-name="T1"> </text:span><text:span text:style-name="T2">(126/6) </text:span> ⲉⲩⲁⲧⲛ ⲁⲣⲏϫϥ ⲡⲉ ⲕⲁⲧⲁ ⲡⲓⲧⲩ‐ <text:line-break/><text:span text:style-name="T1"> </text:span><text:span text:style-name="T2">(126/7) </text:span> ⲡⲟⲥ ⲉⲧ’ϣⲟⲟⲡ’ ⲛϩⲣⲁ̣ⲓ̈ ϩ̣ⲙ ⲡⲓⲕ̅ⲗ̅ⲥ̅ <text:line-break/><text:span text:style-name="T1"> </text:span><text:span text:style-name="T2">(126/8) </text:span> ⲛⲛ ⲉⲱⲛ ⲙⲛ ⲇ̅ⲟ̅ⲝ̅ⲟ̅ⲙ̅[̅ⲉ̅ⲇ̅]̅ⲱ̅ⲛ̅ <text:line-break/><text:span text:style-name="T1"> </text:span><text:span text:style-name="T2">(126/9) </text:span> ⲡⲓⲙⲉϩⲥⲛⲁⲩ ⲛⲛ ⲉⲱ̣[ⲛ] ⲁ̣̅̅ⲕ̅ⲣ̅ⲉ̅ⲙ̅ⲱ̅ⲛ̅ <text:line-break/><text:span text:style-name="T1"> </text:span><text:span text:style-name="T2">(126/10) </text:span> ⲡⲓⲁⲧ’ϣⲁϫⲉ ⲙⲙⲟϥ ⲉⲩⲛ̣ⲧⲁϥ <text:line-break/><text:span text:style-name="T1"> </text:span><text:span text:style-name="T2">(126/11) </text:span> ⲙⲙⲁⲩ ⲙ ⲡⲓⲙⲉϩⲥⲛⲁⲩ ⲙ ⲫⲱⲥ‐ <text:line-break/><text:span text:style-name="T1"> </text:span><text:span text:style-name="T2">(126/12) </text:span> ⲧⲏⲣ· ⲍ̅ⲁ̅ⲭ̅ⲑ̅ⲟ̅ⲥ̅ ⲙⲛ ⲓ̈ⲁ̅ⲭⲑⲟⲥ̅· ⲡⲓ‐ <text:line-break/><text:span text:style-name="T1"> </text:span><text:span text:style-name="T2">(126/13) </text:span> ⲙⲉϩϣⲟⲙⲧ’ ⲇⲉ ⲛⲛ ⲉⲱⲛ ⲡⲉ ⲁⲙ‐ <text:line-break/><text:span text:style-name="T1"> </text:span><text:span text:style-name="T2">(126/14) </text:span> ⲃⲣⲟⲥⲓⲟⲥ ⲡⲓⲡⲁⲣⲑⲉⲛⲟⲥ ⲉⲩⲛⲧ̣ⲁ[ϥ] <text:line-break/><text:span text:style-name="T1"> </text:span><text:span text:style-name="T2">(126/15) </text:span> ⲙⲙⲁⲩ ⲙ ⲡⲓⲙⲉϩϣⲟⲙⲧ’ ⲙ ⲫⲱ‐ <text:line-break/><text:span text:style-name="T1"> </text:span><text:span text:style-name="T2">(126/16) </text:span> ⲥⲧⲏⲣ ⲥ̅ⲏ̅ⲑ̅ⲉ̅ⲩ̅ⲥ̅ ⲙⲛ ⲁⲛⲧⲓⲫⲁ̣ⲛ̣‐ <text:line-break/><text:span text:style-name="T1"> </text:span><text:span text:style-name="T2">(126/17) </text:span> ⲧⲏⲥ· ⲡⲓⲙⲉϩϥⲧⲟⲟⲩ ⲇ[ⲉ] ⲛ[ⲛ ⲉ]‐ <text:line-break/><text:span text:style-name="T1"> </text:span><text:span text:style-name="T2">(126/18) </text:span> ⲱⲛ ⲡⲉ ⲡⲓⲣⲉϥⲥⲙⲟⲩ̣ [..... <text:line-break/><text:span text:style-name="T1"> </text:span><text:span text:style-name="T2">(126/19) </text:span> ⲅⲉⲛⲟⲥ ⲉⲩⲛⲧⲁϥ ⲙⲙ̣[ⲁⲩ ⲙ ⲡⲓⲙⲉϩ]‐ <text:line-break/><text:span text:style-name="T1"> </text:span><text:span text:style-name="T2">(126/20) </text:span> ϥⲧⲟⲟⲩ ⲙ ⲫⲱⲥⲧⲏ[ⲣ ⲥ̅ⲉ̅ⲗ̅ⲇ̅ⲁ̅ⲱ̅] <text:line-break/><text:span text:style-name="T1"> </text:span><text:span text:style-name="T2">(126/21) </text:span> ⲙⲛ ⲉ̅ⲗ̅ⲉ̅ⲛ̅ⲟ̅ⲥ̅· ϣⲁⲩ[..... <text:line-break/><text:span text:style-name="T1"> </text:span><text:span text:style-name="T2">(126/22) </text:span> ⲙ̣ⲉⲛ ⲉ̣[ⲣ]ⲟϥ ⲉⲃⲟⲗ ϩⲓⲧ̣[...... <text:line-break/><text:span text:style-name="T1"> </text:span><text:span text:style-name="T2">(126/23) </text:span> [ ]ⲁ̣̅̅ⲣ̅ⲙ̅[ⲏⲇⲱⲛ <text:line-break/><text:span text:style-name="T1"> </text:span><text:span text:style-name="T2">(126/24) </text:span> [ ].[...... <text:line-break/><text:span text:style-name="T1"> </text:span><text:span text:style-name="T2">(127/1) </text:span> ⲫⲟⲏ ⲍⲟⲏ ⲍⲏⲟⲏ ⲍⲏ[..] ⲍ̣ⲱⲥⲓ <text:line-break/><text:span text:style-name="T1"> </text:span><text:span text:style-name="T2">(127/2) </text:span> ⲍⲱⲥⲓ ⲍⲁⲱ ⲍⲏⲟⲟⲟ ⲍⲏⲥⲉⲛ ⲍⲏⲥ‐ <text:line-break/><text:span text:style-name="T1"> </text:span><text:span text:style-name="T2">(127/3) </text:span> ⲉⲛ· ⲥⲉⲟⲛϩ ⲛϭⲓ ⲛⲓⲕⲁⲧⲁ ⲟⲩⲁ ⲁⲩⲱ <text:line-break/><text:span text:style-name="T1"> </text:span><text:span text:style-name="T2">(127/4) </text:span> ⲡⲓϥⲧⲟⲟⲩ ⲉⲧⲉ ⲛ ϣⲙⲟⲩⲛ ⲛ ⲕⲱⲃ <text:line-break/><text:soft-page-break/><text:span text:style-name="T1"> </text:span><text:span text:style-name="T2">(127/5) </text:span> ⲏⲟⲟⲟⲟⲏⲁⲏⲱ ⲛⲧⲟⲕ ⲉⲧ’ϩⲁ ⲧⲉⲩ‐ <text:line-break/><text:span text:style-name="T1"> </text:span><text:span text:style-name="T2">(127/6) </text:span> ⲉϩⲏ ⲁⲩⲱ ⲛⲧⲟⲕ ⲉⲧ’ϩⲛ ⲛⲁⲓ̈ ⲧⲏ‐ <text:line-break/><text:span text:style-name="T1"> </text:span><text:span text:style-name="T2">(127/7) </text:span> ⲣⲟⲩ· ⲁⲩⲱ ⲛⲁⲓ̈ ⲙⲉⲛ ⲉⲩⲛϩⲣⲁⲓ̈ ϩⲙ <text:line-break/><text:span text:style-name="T1"> </text:span><text:span text:style-name="T2">(127/8) </text:span> ⲡⲓⲡⲣⲱ̣ⲧ̣ⲟⲫⲁⲛⲏⲥ ⲛ ⲧⲉⲗⲓⲟⲥ ⲛ <text:line-break/><text:span text:style-name="T1"> </text:span><text:span text:style-name="T2">(127/9) </text:span> ⲁ̅ⲣ̅ⲙ̅ⲏ̣̅̅ⲇ̣̅̅ⲱ̣̅̅ⲛ̅ ⲛ ϩⲟⲟⲩⲧ’· ϯⲉⲛⲉⲣⲅⲓⲁ <text:line-break/><text:span text:style-name="T1"> </text:span><text:span text:style-name="T2">(127/10) </text:span> ⲛⲧⲉ ⲛ̣ⲁ̣[ⲓ̈] ⲧⲏⲣⲟⲩ ⲉⲧ’ϣⲟⲟⲡ’ ϩⲓ ⲟⲩ‐ <text:line-break/><text:span text:style-name="T1"> </text:span><text:span text:style-name="T2">(127/11) </text:span> ⲙⲁ· ⲉⲡⲓⲇⲏ ⲛⲉⲩϣⲟⲟⲡ’ ⲛϭⲓ ⲛⲓ‐ <text:line-break/><text:span text:style-name="T1"> </text:span><text:span text:style-name="T2">(127/12) </text:span> ⲕⲁⲧⲁ ⲟⲩⲁ ⲧⲏⲣⲟⲩ ⲛ ⲧⲉⲗⲓⲟⲥ <text:line-break/><text:span text:style-name="T1"> </text:span><text:span text:style-name="T2">(127/13) </text:span> ⲁⲥⲟⲩⲱⲛϩ ⲉⲃⲟⲗ ⲟⲛ ⲛϭⲓ ϯⲉⲛⲉⲣ‐ <text:line-break/><text:span text:style-name="T1"> </text:span><text:span text:style-name="T2">(127/14) </text:span> ⲅⲓⲁ ⲛⲧⲉ ⲛⲓⲕⲁⲧⲁ ⲟⲩⲁ ⲧⲏⲣⲟⲩ· ⲡⲓ‐ <text:line-break/><text:span text:style-name="T1"> </text:span><text:span text:style-name="T2">(127/15) </text:span> ⲁⲩⲧⲟⲅⲉⲛⲏⲥ ⲛ ⲛⲟⲩⲧⲉ· ⲛⲧⲟϥ <text:line-break/><text:span text:style-name="T1"> </text:span><text:span text:style-name="T2">(127/16) </text:span> ⲙⲉⲛ ⲉϥⲁϩⲉⲣⲁⲧϥ ⲛϩⲣⲁⲓ̈ ϩⲛ ⲟⲩ‐ <text:line-break/><text:span text:style-name="T1"> </text:span><text:span text:style-name="T2">(127/17) </text:span> ⲉⲱⲛ· ⲉⲩⲛ ϥⲧⲟⲟⲩ ⲛ ⲇⲓⲁⲫⲟⲣⲁ <text:line-break/><text:span text:style-name="T1"> </text:span><text:span text:style-name="T2">(127/18) </text:span> ⲛⲧⲉ ϩⲉⲛⲉⲱⲛ ⲛϩⲣⲁⲓ̈ ⲛϩⲏⲧϥ ⲛ‐ <text:line-break/><text:span text:style-name="T1"> </text:span><text:span text:style-name="T2">(127/19) </text:span> [ⲧ]ⲉ ⲛⲓⲁⲩ̣ⲧⲟⲅⲉⲛⲏⲥ· ⲡⲓϣⲟⲣⲡ’ <text:line-break/><text:span text:style-name="T1"> </text:span><text:span text:style-name="T2">(127/20) </text:span> ⲇ̣ⲉ ⲛⲛ [ⲉ]ⲱ̣ⲛ ⲉⲧ’ϣⲟⲟⲡ’ ⲛϩⲏⲧϥ <text:line-break/><text:span text:style-name="T1"> </text:span><text:span text:style-name="T2">(127/21) </text:span> [ⲛ]ⲧⲉ ⲡ[ⲓϣ]ⲟⲣⲡ’ ⲙ ⲫⲱⲥⲧⲏⲣ <text:line-break/><text:span text:style-name="T1"> </text:span><text:span text:style-name="T2">(127/22) </text:span> [ⲁⲣⲙⲟⲍⲏ]ⲗ· ⲟ̅ⲣ̅ⲛ̅ⲉ̅ⲟ̅ⲥ̅ ⲉ̅ⲩⲑⲣⲟⲩ̅ <text:line-break/><text:span text:style-name="T1"> </text:span><text:span text:style-name="T2">(127/23) </text:span> ⲛ̣̅ⲓ̅ⲟ̅ⲥ̅ [ⲡⲏ] ⲁⲩⲙⲟⲩⲧⲉ ⲉⲣ̣ⲟϥ <text:line-break/><text:span text:style-name="T1"> </text:span><text:span text:style-name="T2">(127/24) </text:span> [ϫⲉ .....]ⲁ̣̅.̅[........ <text:line-break/><text:span text:style-name="T1"> </text:span><text:span text:style-name="T2">(127/25) </text:span> [.. ⲡⲓⲙⲉϩ]ⲥ̣ⲛⲁ̣ⲩ ⲇ̣[ⲉ ⲛⲛ ⲉⲱⲛ ⲛⲧⲉ] <text:line-break/><text:span text:style-name="T1"> </text:span><text:span text:style-name="T2">(127/26) </text:span> [ⲡⲓⲙⲉϩⲥⲛ]ⲁ̣ⲓ ⲙ̣ [ⲫⲱⲥⲧⲏⲣ ⲱ̅]‐ <text:line-break/><text:span text:style-name="T1"> </text:span><text:span text:style-name="T2">(127/27) </text:span> [ⲣⲟⲓ̈ⲁⲏⲗ ..]ⲩⲇⲁ̅ⲥ̣̅̅[.]ⲟ̅ⲥ̅· ⲁ̅ⲡ̅[.. <text:line-break/><text:span text:style-name="T1"> </text:span><text:span text:style-name="T2">(128/1) </text:span> ⲁ̅ⲣ̅ⲣ̅ⲟ̅ⲥ̣̅̅[...] ⲡ̣ⲓⲙⲉϩϣⲟⲙⲧ’ ⲇⲉ ⲛ‐ <text:line-break/><text:span text:style-name="T1"> </text:span><text:span text:style-name="T2">(128/2) </text:span> ⲧⲉ ⲡⲓⲙⲉϩϣⲟⲙⲧ’ ⲙ ⲫⲱⲥⲧⲏⲣ <text:line-break/><text:span text:style-name="T1"> </text:span><text:span text:style-name="T2">(128/3) </text:span> ⲇ̅ⲁ̅ⲩ̅ⲉ̅ⲓ̅ⲑ̅ⲉ̅· ⲗ̅ⲁⲣⲁⲛⲉⲩⲥ̅· ⲉ̅ⲡⲓⲫⲁ̅‐ <text:line-break/><text:span text:style-name="T1"> </text:span><text:span text:style-name="T2">(128/4) </text:span> ⲛ̅ⲓ̅ⲟ̅ⲥ̅· ⲉ̅ⲓⲇⲉⲟⲥ̅· ⲡⲓⲙⲉϩϥⲧⲟⲟⲩ <text:line-break/><text:span text:style-name="T1"> </text:span><text:span text:style-name="T2">(128/5) </text:span> ⲇⲉ ⲛⲧⲉ ⲡⲓⲙⲉϩϥⲧⲟⲟⲩ ⲙ ⲫⲱ‐ <text:line-break/><text:span text:style-name="T1"> </text:span><text:span text:style-name="T2">(128/6) </text:span> ⲥⲧⲏⲣ ⲏ̅ⲗ̅ⲏ̅ⲗ̅ⲏ̅ⲑ̅· ⲕ̅ⲟⲇⲏⲣⲏ̅· ⲉ̅ⲡⲓ̅‐ <text:line-break/><text:span text:style-name="T1"> </text:span><text:span text:style-name="T2">(128/7) </text:span> ⲫ̅ⲁ̅ⲛ̅ⲓ̅ⲟ̅ⲥ̅· ⲁⲗⲗⲟⲅⲉⲛⲓⲟⲥ̣[·] ⲛ̣ⲓⲕⲟ‐ <text:line-break/><text:span text:style-name="T1"> </text:span><text:span text:style-name="T2">(128/8) </text:span> ⲟⲩⲉ ⲇⲉ ⲧⲏⲣⲟⲩ ⲉⲧ’ϣⲟ̣[ⲟ]ⲡ’ ϩⲛ ϯ‐ <text:line-break/><text:span text:style-name="T1"> </text:span><text:span text:style-name="T2">(128/9) </text:span> ϩⲩⲗⲏ ⲛⲧⲟⲟⲩ ⲧⲏⲣⲟⲩ ⲛ̣[ⲉⲩ]ϭⲉⲉⲧ’ <text:line-break/><text:span text:style-name="T1"> </text:span><text:span text:style-name="T2">(128/10) </text:span> ⲡⲉ· ⲁⲩⲱ ⲉⲧⲃⲉ ⲟⲩⲅⲛⲱ[ⲥ]ⲓ̣ⲥ ⲛⲧⲉ <text:line-break/><text:span text:style-name="T1"> </text:span><text:span text:style-name="T2">(128/11) </text:span> ⲟⲩⲙⲛⲧⲛⲟϭ ⲙⲛ ⲟⲩⲧⲟⲗⲙⲏ ⲁⲩⲱ <text:line-break/><text:span text:style-name="T1"> </text:span><text:span text:style-name="T2">(128/12) </text:span> ⲟⲩϭⲟⲙ ⲉⲁⲩϣⲱⲡⲉ ⲁⲩⲱ ⲁⲩ‐ <text:line-break/><text:span text:style-name="T1"> </text:span><text:span text:style-name="T2">(128/13) </text:span> ⲥⲉⲗⲥⲱⲗⲟⲩ· ⲉⲁⲩⲣ ⲁⲧ’ⲉⲓⲙⲉ ⲉ ⲡ‐ <text:line-break/><text:span text:style-name="T1"> </text:span><text:span text:style-name="T2">(128/14) </text:span> ⲛⲟⲩⲧⲉ ⲥⲉⲛⲁⲃⲱⲗ ⲉⲃⲟⲗ· ⲉⲓⲥ ϩⲏ‐ <text:line-break/><text:span text:style-name="T1"> </text:span><text:span text:style-name="T2">(128/15) </text:span> ⲏⲧⲉ ⲍ̅ⲱ̅ⲥ̅ⲧ̅ⲣ̅ⲓ̅ⲁ̅ⲛ̅ⲉ̅ ⲁⲕⲥⲱⲧⲙ <text:line-break/><text:span text:style-name="T1"> </text:span><text:span text:style-name="T2">(128/16) </text:span> ⲉⲣⲟⲟⲩ ⲧⲏⲣⲟⲩ ⲛⲁⲓ̈ ⲉⲧⲉ ⲛⲓⲛⲟⲩⲧⲉ <text:line-break/><text:span text:style-name="T1"> </text:span><text:span text:style-name="T2">(128/17) </text:span> ⲉ ⲛ ⲁⲧ’ⲉⲓⲙⲉ ⲉⲣⲟⲟⲩ· ⲁⲩⲱ ⲉⲩⲉ ⲛ‐ <text:line-break/><text:span text:style-name="T1"> </text:span><text:span text:style-name="T2">(128/18) </text:span> ⲛ ⲁⲧⲛ ⲁⲣⲏϫⲛⲟⲩ ⲛ ϩⲉⲛⲁⲅⲅⲉⲗⲟⲥ <text:line-break/><text:span text:style-name="T1"> </text:span><text:span text:style-name="T2">(128/19) </text:span> ⲁⲛⲟⲕ ⲇⲉ ⲁⲓ̈ⲧⲟⲗⲙⲁ ⲡⲉ[ϫ]ⲁ̣ⲓ̈ ϫⲉ ⲉ[ⲧⲓ] <text:line-break/><text:span text:style-name="T1"> </text:span><text:span text:style-name="T2">(128/20) </text:span> ⲟⲛ ϯⲕⲱⲧⲉ ⲉⲧⲃⲉ ⲡⲓϣ̣ⲙ̣ⲧ’ϭⲟⲙ [ⲛ]‐ <text:line-break/><text:span text:style-name="T1"> </text:span><text:span text:style-name="T2">(128/21) </text:span> ⲛ ⲁⲧⲛⲁⲩ ⲉⲣⲟϥ ⲛ ⲧⲉⲗⲓ[ⲟⲥ] ⲙ ⲡ̅ⲛ̅[ⲁ̅] <text:line-break/><text:span text:style-name="T1"> </text:span><text:span text:style-name="T2">(128/22) </text:span> ⲡⲱⲥ ϥϣⲟⲟⲡ’ ⲛⲁϥ ⲁⲩ̣[..]...[ϥ]‐ <text:line-break/><text:span text:style-name="T1"> </text:span><text:span text:style-name="T2">(128/23) </text:span> ⲉⲓϭ̣ⲉ ⲉ ⲛⲁⲓ̈ ⲧⲏⲣⲟⲩ· ⲙ[.. .]ⲏ ⲉⲧ’ <text:line-break/><text:span text:style-name="T1"> </text:span><text:span text:style-name="T2">(128/24) </text:span> ϣ̣[ⲟ]ⲟ̣ⲡ’ ⲟⲛⲧⲱⲥ ⲉⲙ[....]ⲧⲉ̣ⲥ̣ <text:line-break/><text:soft-page-break/><text:span text:style-name="T1"> </text:span><text:span text:style-name="T2">(128/25) </text:span> [.....]ⲉ[.]ϫ[..] ⲁ̣ϣ ⲡⲉ ⲡ[..... <text:line-break/><text:span text:style-name="T1"> </text:span><text:span text:style-name="T2">(128/26) </text:span> [.......]ⲙ̣ⲁ̣[..]ⲩ̣ ⲏ%0 ⲟ̣[....... <text:line-break/><text:span text:style-name="T1"> </text:span><text:span text:style-name="T2">(128/27) </text:span> [......]. ⲛⲧⲉ̣[.]ϫⲟⲟ̣[...... <text:line-break/><text:span text:style-name="T1"> </text:span><text:span text:style-name="T2">(129/1) </text:span> ⲟⲩ ⲉⲙⲁⲧⲉ ⲁⲩⲕⲁⲁ[ⲧ’ ⲁ]ⲩⲃⲱⲕ· <text:line-break/><text:span text:style-name="T1"> </text:span><text:span text:style-name="T2">(129/2) </text:span> ⲁⲩⲱ ⲁϥⲉⲓ ⲛⲛⲁϩⲣⲁⲓ̈ ⲛϭⲓ ⲁ̅ⲡ̅ⲟ̅ⲫ̅ⲁ̅ⲛ̅ⲧ̅ⲏ̅ⲥ̅· <text:line-break/><text:span text:style-name="T1"> </text:span><text:span text:style-name="T2">(129/3) </text:span> ⲙⲛ ⲁ̅ⲫ̅ⲣ̅ⲟ̅ⲡ̅ⲁ̅ⲓ̅ⲥ̅· ⲡⲁⲣⲑⲉⲛⲱⲫⲱⲧⲟⲥ· <text:line-break/><text:span text:style-name="T1"> </text:span><text:span text:style-name="T2">(129/4) </text:span> ⲁⲩⲱ ⲁϥⲛⲧ’ ⲉϩⲟⲩⲛ ⲉ ⲡⲓⲡⲣⲱⲧⲟⲫⲁ‐ <text:line-break/><text:span text:style-name="T1"> </text:span><text:span text:style-name="T2">(129/5) </text:span> ⲛⲏⲥ ⲛ ⲛⲟϭ ⲛ ϩⲟⲟⲩⲧ’ ⲛ ⲧⲉⲗⲓⲟⲥ ⲛ <text:line-break/><text:span text:style-name="T1"> </text:span><text:span text:style-name="T2">(129/6) </text:span> ⲛⲟⲩⲥ· ⲁⲩⲱ ⲁⲓ̈ⲛⲁⲩ ⲉ ⲛⲁⲓ̈ ⲧⲏⲣⲟⲩ <text:line-break/><text:span text:style-name="T1"> </text:span><text:span text:style-name="T2">(129/7) </text:span> ⲉⲧⲙⲙⲁ̣ⲩ ⲙ ⲡⲣⲏⲧⲉ ⲉⲧⲟⲩϣⲟⲟⲡ’ <text:line-break/><text:span text:style-name="T1"> </text:span><text:span text:style-name="T2">(129/8) </text:span> ⲙⲙⲟⲥ ⲛ̣ϩⲣⲁⲓ̈ ϩⲛ ⲟⲩⲁ· ⲁⲩⲱ ⲁⲉⲓϩⲱ‐ <text:line-break/><text:span text:style-name="T1"> </text:span><text:span text:style-name="T2">(129/9) </text:span> ⲧⲡ’ ⲛⲙⲙ̣ⲁⲩ ⲧⲏⲣⲟⲩ ⲁⲉⲓⲥⲙⲟⲩ <text:line-break/><text:span text:style-name="T1"> </text:span><text:span text:style-name="T2">(129/10) </text:span> ⲉ ⲡⲓⲉⲱ̣ⲛ ⲛ ⲕ̅ⲗ̅ⲥ̅ ⲙⲛ ϯⲃⲁⲣⲃⲏⲗⲱ <text:line-break/><text:span text:style-name="T1"> </text:span><text:span text:style-name="T2">(129/11) </text:span> ⲙ ⲡⲁⲣⲑⲉⲛⲟⲥ ⲙⲛ ⲡⲓⲁϩⲟⲣⲁⲧⲟⲛ <text:line-break/><text:span text:style-name="T1"> </text:span><text:span text:style-name="T2">(129/12) </text:span> ⲙ ⲡ̅ⲛ̅ⲁ̅· ⲁⲩⲱ ⲁⲉⲓϣⲱⲡⲉ ⲙ ⲡⲁⲛ‐ <text:line-break/><text:span text:style-name="T1"> </text:span><text:span text:style-name="T2">(129/13) </text:span> ⲧⲉⲗⲓⲟⲥ ⲁⲉⲓϫⲓ ϭⲟⲙ ⲁⲩⲥⲁϩⲧ’ <text:line-break/><text:span text:style-name="T1"> </text:span><text:span text:style-name="T2">(129/14) </text:span> ϩⲙ ⲡⲉⲟⲟⲩ ⲁⲩⲣ ⲥⲫⲣⲁⲅⲓⲍⲉ ⲙ‐ <text:line-break/><text:span text:style-name="T1"> </text:span><text:span text:style-name="T2">(129/15) </text:span> ⲙⲟⲉⲓ· ⲁⲉⲓϫⲓ ⲛ ⲟⲩⲕⲗⲟⲙ ⲛ ⲧⲉ‐ <text:line-break/><text:span text:style-name="T1"> </text:span><text:span text:style-name="T2">(129/16) </text:span> ⲗⲓⲟⲥ ⲙ ⲡⲓⲙⲁ ⲉⲧⲙⲙⲁⲩ ⲁⲓ̈ⲉⲓ <text:line-break/><text:span text:style-name="T1"> </text:span><text:span text:style-name="T2">(129/17) </text:span> ⲉⲃⲟⲗ ⲉ ⲛⲓⲕⲁⲧⲁ ⲟⲩⲁ ⲛ ⲧⲉⲗⲓⲟⲥ <text:line-break/><text:span text:style-name="T1"> </text:span><text:span text:style-name="T2">(129/18) </text:span> ⲁⲩⲱ ⲛⲁⲩϣⲓⲛⲉ ⲙⲙⲟⲉⲓ ⲧⲏ‐ <text:line-break/><text:span text:style-name="T1"> </text:span><text:span text:style-name="T2">(129/19) </text:span> ⲣⲟⲩ ⲡⲉ· ⲛⲉⲩⲥⲱⲧⲙ ⲉ ⲛⲓⲙⲛ‐ <text:line-break/><text:span text:style-name="T1"> </text:span><text:span text:style-name="T2">(129/20) </text:span> ⲧⲛⲟϭ ⲛⲧⲉ ϯⲅⲛⲱⲥⲓⲥ ⲛⲉⲩⲧⲉ‐ <text:line-break/><text:span text:style-name="T1"> </text:span><text:span text:style-name="T2">(129/21) </text:span> ⲗ̣ⲏⲗ ⲙ[ⲙⲟ]ⲟⲩ ⲡⲉ· ⲁⲩⲱ ⲛⲉⲩ‐ <text:line-break/><text:span text:style-name="T1"> </text:span><text:span text:style-name="T2">(129/22) </text:span> ϫ̣ⲓ ϭⲟⲙ[·] ⲁ̣ⲩⲱ ⲁⲛⲟⲕ ⲟⲛ ⲉⲧⲁⲓ̈‐ <text:line-break/><text:span text:style-name="T1"> </text:span><text:span text:style-name="T2">(129/23) </text:span> ⲉⲓ ⲉϩⲣ[ⲁⲓ̈] ⲉ ⲛⲓⲉⲱⲛ ⲛⲧⲉ ⲛⲓⲁⲩ‐ <text:line-break/><text:span text:style-name="T1"> </text:span><text:span text:style-name="T2">(129/24) </text:span> ⲧ̣ⲟ̣ⲅⲉ̣[ⲛ]ⲏ̣ⲥ ⲁⲉⲓϫⲓ ⲛⲛ ⲟⲩⲉⲓⲛ̣[ⲉ ⲙ̅] <text:line-break/><text:span text:style-name="T1"> </text:span><text:span text:style-name="T2">(129/25) </text:span> ⲙ̣ⲉ̣ ⲉ[ϥⲧ]ⲟⲩⲃⲏⲩ ⲉϥⲙⲡ̣ϣⲁ <text:line-break/><text:span text:style-name="T1"> </text:span><text:span text:style-name="T2">(129/26) </text:span> ⲛ ⲧⲁⲓ[ⲥⲑ]ⲏ̣ⲥⲓⲥ· ⲁⲓ̈ⲉⲓ ⲉϩⲣⲁⲓ̣̈ ⲉ <text:line-break/><text:span text:style-name="T1"> </text:span><text:span text:style-name="T2">(129/27) </text:span> ⲛⲓⲁⲛⲧⲓⲧⲩⲡⲟⲥ ⲛⲛ ⲉⲱⲛ̣ <text:line-break/><text:span text:style-name="T1"> </text:span><text:span text:style-name="T2">(129/28) </text:span> ⲁⲩⲱ ⲁ̣[ⲓ̈]ⲉⲓ ⲉⲃⲟⲗ ⲙⲙⲁⲩ ⲉϩ[ⲣⲁⲓ̈] <text:line-break/><text:span text:style-name="T1"> </text:span><text:span text:style-name="T2">(130/1) </text:span> ⲉ ⲡⲕ̣[ⲁϩ ⲛ]ⲛ̣ ⲁⲏⲣ· ⲁⲩⲱ ⲁⲓ̈ⲥϩⲁⲓ̈ ⲛ <text:line-break/><text:span text:style-name="T1"> </text:span><text:span text:style-name="T2">(130/2) </text:span> ϣⲟⲙⲧ’ ⲙ ⲡⲩⲝⲟⲥ ⲁⲉⲓⲕⲁⲁⲩ <text:line-break/><text:span text:style-name="T1"> </text:span><text:span text:style-name="T2">(130/3) </text:span> ⲉⲩⲅⲛⲱⲥⲓⲥ ⲛ ⲛⲏ ⲉⲧⲛⲏⲩ ⲙⲛⲛ‐ <text:line-break/><text:span text:style-name="T1"> </text:span><text:span text:style-name="T2">(130/4) </text:span> ⲥⲱⲉⲓ ⲛⲓⲥⲱⲧⲡ’ ⲉⲧⲟⲛϩ· ⲁⲩⲱ ⲁ‐ <text:line-break/><text:span text:style-name="T1"> </text:span><text:span text:style-name="T2">(130/5) </text:span> ⲛⲟⲕ ⲁⲓ̈ⲉⲓ ⲉϩⲣⲁⲓ̈ ⲉ ⲡⲕⲟⲥⲙⲟⲥ ⲛ‐ <text:line-break/><text:span text:style-name="T1"> </text:span><text:span text:style-name="T2">(130/6) </text:span> ⲛ ⲉⲥⲑⲏⲧⲟⲛ ⲁⲩⲱ ⲁⲓ̈ϯ ⲙ ⲡⲁⲧⲟⲩ‐ <text:line-break/><text:span text:style-name="T1"> </text:span><text:span text:style-name="T2">(130/7) </text:span> ⲱⲧ’ ϩⲓⲱⲱⲧ’ ⲉϥⲉ ⲛⲛ ⲁ̣ⲧ’ⲥⲃⲱ· <text:line-break/><text:span text:style-name="T1"> </text:span><text:span text:style-name="T2">(130/8) </text:span> ⲁⲉⲓϯ ϭⲟⲙ ⲛⲁϥ ⲁⲉⲓⲙⲟⲟϣⲉ ⲉⲉⲓⲧⲁ‐ <text:line-break/><text:span text:style-name="T1"> </text:span><text:span text:style-name="T2">(130/9) </text:span> ϣⲉ ⲟⲉⲓϣ ⲛⲁⲩ ⲧⲏⲣⲟ[ⲩ ⲛ] ϯⲙⲛⲧⲙⲉ· <text:line-break/><text:span text:style-name="T1"> </text:span><text:span text:style-name="T2">(130/10) </text:span> ⲟⲩⲧⲉ ⲛⲓⲙⲛⲧ’ⲁⲅⲅⲉⲗⲟ̣ⲥ ⲛⲧⲉ ⲡⲕⲟ‐ <text:line-break/><text:span text:style-name="T1"> </text:span><text:span text:style-name="T2">(130/11) </text:span> ⲥⲙⲟⲥ ⲟⲩⲧⲉ ⲛⲓⲁⲣⲭⲱⲛ ⲙⲡⲟⲩ‐ <text:line-break/><text:span text:style-name="T1"> </text:span><text:span text:style-name="T2">(130/12) </text:span> ⲛⲁⲩ ⲉⲣⲟⲉⲓ· ⲟⲩⲙⲏⲏϣⲉ ⲅⲁⲣ ⲛ ⲧ̣[ϭⲁ]‐ <text:line-break/><text:span text:style-name="T1"> </text:span><text:span text:style-name="T2">(130/13) </text:span> ⲉⲓⲟ ⲛⲧⲁⲩⲛⲧ ⲉ ⲡⲙⲟⲩ ⲁⲉⲓⲃⲟⲗⲟ̣[ⲩ] <text:line-break/><text:span text:style-name="T1"> </text:span><text:span text:style-name="T2">(130/14) </text:span> ⲉⲃⲟⲗ· ⲟⲩⲙⲏⲏϣⲉ ⲇⲉ ⲉⲩⲥⲟⲣⲙ <text:line-break/><text:span text:style-name="T1"> </text:span><text:span text:style-name="T2">(130/15) </text:span> ⲁⲉⲓⲧⲟⲩⲛⲟⲥⲟⲩ ⲉⲓ̈ϫⲱ ⲙⲙⲟⲥ <text:line-break/><text:span text:style-name="T1"> </text:span><text:span text:style-name="T2">(130/16) </text:span> ϫⲉ ⲉⲓⲙⲉ ⲛⲏ ⲉⲧⲟⲛϩ ⲙⲛ ϯⲥⲡⲟⲣ[ⲁ] <text:line-break/><text:soft-page-break/><text:span text:style-name="T1"> </text:span><text:span text:style-name="T2">(130/17) </text:span> ⲉⲧⲟⲩⲁⲁⲃ ⲛⲧⲉ ⲥ̅ⲏ̅ⲑ̅ ʹ264 ⲙⲡⲣⲧⲟⲩ[ⲟ ⲛ] <text:line-break/><text:span text:style-name="T1"> </text:span><text:span text:style-name="T2">(130/18) </text:span> ⲁⲧ’ⲥⲱⲧⲙ ⲛⲥⲱⲉⲓ· ⲙⲁⲧⲟⲩ ⲛ[ⲉⲥ] <text:line-break/><text:span text:style-name="T1"> </text:span><text:span text:style-name="T2">(130/19) </text:span> ⲡⲉⲧⲛⲛⲟⲩⲧⲉ ϩⲁ ⲡⲛⲟⲩⲧⲉ· ⲁ̣[ⲩⲱ] <text:line-break/><text:span text:style-name="T1"> </text:span><text:span text:style-name="T2">(130/20) </text:span> ϯⲯⲩⲭⲏ ⲛ ⲁⲧ’ⲕⲁϭ[ⲓ]ⲁ̣ ⲉ̣ⲧ’ⲥⲟ̣[ⲧⲡ] <text:line-break/><text:span text:style-name="T1"> </text:span><text:span text:style-name="T2">(130/21) </text:span> ϯ ϭⲟⲙ ⲛⲁⲥ ⲁⲩⲱ ⲁⲛ[ⲁⲩ] ⲉ ⲡⲓⲟⲩ̣‐ <text:line-break/><text:span text:style-name="T1"> </text:span><text:span text:style-name="T2">(130/22) </text:span> ⲱⲧⲃ ⲉⲃⲟⲗ ⲉⲧⲙ ⲡⲓⲙ[ⲁ] ⲁⲩⲱ <text:line-break/><text:span text:style-name="T1"> </text:span><text:span text:style-name="T2">(130/23) </text:span> ⲕ̣ⲱⲧⲉ ⲛⲥⲁ ϯⲙⲛⲧ’ⲁ[ⲧ]ⲙⲓⲥⲉ ⲛ̣‐ <text:line-break/><text:span text:style-name="T1"> </text:span><text:span text:style-name="T2">(130/24) </text:span> ⲛ ⲁⲧⲟⲩⲱⲧⲃ ⲉⲃⲟⲗ [ⲡⲉⲓ]ⲱⲧ’ ⲛⲧ̣ⲉ <text:line-break/><text:span text:style-name="T1"> </text:span><text:span text:style-name="T2">(130/25) </text:span> ⲛⲁⲓ̈ ⲧⲏⲣⲟⲩ ϥⲧⲱϩⲙ [ⲙ]ⲙⲱⲧⲛ <text:line-break/><text:span text:style-name="T1"> </text:span><text:span text:style-name="T2">(130/26) </text:span> ⲉ̣[ⲩⲥ]ⲟϩⲉ ⲛⲏⲧⲛ ⲁⲩⲱ ⲉⲩϫⲓ ⲙⲙⲱ‐ <text:line-break/><text:span text:style-name="T1"> </text:span><text:span text:style-name="T2">(131/1) </text:span> ⲧⲛ ⲛ ϭⲟⲛⲥ ϥⲛⲁⲕⲁ ⲧⲏ̣[ⲛ]ⲉ̣ ⲛⲥⲱϥ ⲁⲛ· <text:line-break/><text:span text:style-name="T1"> </text:span><text:span text:style-name="T2">(131/2) </text:span> ⲙⲡⲣϫⲱⲕⲙ ⲙⲙⲱⲧⲛ ϩⲛ ⲟⲩⲙⲟⲩ· <text:line-break/><text:span text:style-name="T1"> </text:span><text:span text:style-name="T2">(131/3) </text:span> ⲟⲩⲧⲉ ⲙⲡⲣϯ ⲧⲏⲛⲉ ⲛⲧⲟⲟⲧⲟⲩ ⲛ <text:line-break/><text:span text:style-name="T1"> </text:span><text:span text:style-name="T2">(131/4) </text:span> ⲛⲏ ⲉⲧ’ⲑⲉⲃⲓⲏⲩ ⲉⲣⲱⲧⲛ ϩⲁ ⲛⲏ ⲉⲧ’‐ <text:line-break/><text:span text:style-name="T1"> </text:span><text:span text:style-name="T2">(131/5) </text:span> ⲥⲟⲧⲡ’· ⲡⲱⲧ’ ⲛⲧⲟⲟⲧϥ ⲙ ⲡⲓⲗⲓⲃⲉ <text:line-break/><text:span text:style-name="T1"> </text:span><text:span text:style-name="T2">(131/6) </text:span> ⲙⲛ ⲡⲓⲥⲛ̣ⲁϩ ⲛⲧⲉ ϯⲙⲛⲧ’ⲥⲓⲙⲉ· <text:line-break/><text:span text:style-name="T1"> </text:span><text:span text:style-name="T2">(131/7) </text:span> ⲁⲩⲱ ⲥⲱⲧⲡ’ ⲛⲏⲧⲛ ⲙ ⲡⲓⲟⲩϫⲁⲉⲓ <text:line-break/><text:span text:style-name="T1"> </text:span><text:span text:style-name="T2">(131/8) </text:span> ⲛⲧⲉ ϯⲙ̣ⲛⲧ’ϩⲟⲟⲩⲧ’· ⲛⲧⲁⲧⲉⲧⲛ‐ <text:line-break/><text:span text:style-name="T1"> </text:span><text:span text:style-name="T2">(131/9) </text:span> ⲉⲓ ⲁⲛ [ⲉ] ϫ̣[ⲓ] ⲙⲕⲁϩ· ⲁⲗⲗⲁ ⲛⲧⲁⲧⲉⲧⲛ‐ <text:line-break/><text:span text:style-name="T1"> </text:span><text:span text:style-name="T2">(131/10) </text:span> ⲉⲓ ⲉ ⲃⲱⲗ̣ ⲙ ⲡⲉⲧⲛⲥⲛⲁϩ ⲉⲃⲟⲗ· ⲃⲁⲗ <text:line-break/><text:span text:style-name="T1"> </text:span><text:span text:style-name="T2">(131/11) </text:span> ⲧⲏⲛⲉ ⲉⲃⲟⲗ· ⲁⲩⲱ ⲡⲏ ⲉⲧⲁϥⲙⲟⲩⲣ <text:line-break/><text:span text:style-name="T1"> </text:span><text:span text:style-name="T2">(131/12) </text:span> ⲙⲙⲱⲧⲛ ⲉϥⲉⲃⲱⲗ ⲉⲃⲟⲗ· ⲛⲁϩⲙ <text:line-break/><text:span text:style-name="T1"> </text:span><text:span text:style-name="T2">(131/13) </text:span> ⲧⲏⲛⲉ ϩⲓⲛⲉ ϫⲉ ⲉⲣⲉⲧⲏ ⲉⲧⲙⲙⲁⲩ <text:line-break/><text:span text:style-name="T1"> </text:span><text:span text:style-name="T2">(131/14) </text:span> ⲉⲥⲉⲛⲟⲩϩⲙ· ⲡⲓⲭ̅ⲣ̅ⲥ̅ ⲛ ⲉⲓⲱⲧ’ ⲁϥ‐ <text:line-break/><text:span text:style-name="T1"> </text:span><text:span text:style-name="T2">(131/15) </text:span> ⲧⲛⲛⲟⲟⲩ ⲛⲏⲧⲛ ⲙ ⲡⲓⲥⲱⲧⲏⲣ <text:line-break/><text:span text:style-name="T1"> </text:span><text:span text:style-name="T2">(131/16) </text:span> ⲁⲩⲱ ⲁϥϯ ⲛⲏⲧⲛ ⲛ ϯϭⲟⲙ· ⲉⲧⲃⲉ <text:line-break/><text:span text:style-name="T1"> </text:span><text:span text:style-name="T2">(131/17) </text:span> ⲟ̣ⲩ ⲧⲉⲧⲛⲁⲍⲉ· ⲕⲱⲧⲉ ⲉⲩⲕⲱⲧⲉ̣ <text:line-break/><text:span text:style-name="T1"> </text:span><text:span text:style-name="T2">(131/18) </text:span> ⲛⲥⲁ ⲧⲏⲩⲧⲛ· ⲉⲩⲧⲱϩⲙ ⲙⲙⲱ‐ <text:line-break/><text:span text:style-name="T1"> </text:span><text:span text:style-name="T2">(131/19) </text:span> ⲧⲛ ⲥⲱⲧⲙ· ⲟⲩⲕⲟⲩⲉⲓ ⲅⲁⲣ ⲡⲉ <text:line-break/><text:span text:style-name="T1"> </text:span><text:span text:style-name="T2">(131/20) </text:span> [ⲡⲓ]ⲭⲣⲟ̣[ⲛⲟ]ⲥ ⲙⲡⲣⲧⲣⲉⲩⲣ ϩⲁⲗ ⲙ‐ <text:line-break/><text:span text:style-name="T1"> </text:span><text:span text:style-name="T2">(131/21) </text:span> ⲙ̣ⲱⲧ[ⲛ] ⲟⲩⲛⲟϭ ⲡⲉ ⲡⲓⲁⲓⲱⲛ <text:line-break/><text:span text:style-name="T1"> </text:span><text:span text:style-name="T2">(131/22) </text:span> ⲛⲧⲉ ⲡ[ⲓⲁ]ⲓⲱⲛ ⲛⲧⲉ ⲛⲉⲧⲟⲛϩ· <text:line-break/><text:span text:style-name="T1"> </text:span><text:span text:style-name="T2">(131/23) </text:span> ⲙⲛ ϯ[ⲕⲟ]ⲗ̣ⲁⲥⲓⲥ ⲛⲧⲉ ⲛⲏ ⲉⲧⲟ̣ [ⲛ] <text:line-break/><text:span text:style-name="T1"> </text:span><text:span text:style-name="T2">(131/24) </text:span> ⲁⲧ’ⲧⲱ̣ⲧ’ ⲛ ϩⲏⲧ’· ⲟⲩⲛ ⲟⲩⲙⲏ‐ <text:line-break/><text:span text:style-name="T1"> </text:span><text:span text:style-name="T2">(131/25) </text:span> ⲏϣⲉ ⲛ [ⲥ]ⲛⲁϩ ⲕⲱⲧⲉ ⲉⲣⲱⲧⲛ <text:line-break/><text:span text:style-name="T1"> </text:span><text:span text:style-name="T2">(131/26) </text:span> ⲙⲛ ϩⲉⲛⲣⲉϥϯ ⲕⲟⲗⲁⲥⲓⲥ· ʹ264ʹ264ʹ264 <text:line-break/><text:span text:style-name="T1"> </text:span><text:span text:style-name="T2">(132/1) </text:span> ⲡⲱϩ ⲛ̣[ϩⲣ]ⲁ̣ⲓ̈ ϩⲛ ⲟⲩⲕⲟⲩⲉⲓ ⲛ ⲥⲏⲟ[ⲩ] <text:line-break/><text:span text:style-name="T1"> </text:span><text:span text:style-name="T2">(132/2) </text:span> ⲉⲙⲡⲁⲧϥⲧ̣ⲁϩⲱⲧⲛ ⲛϭⲓ ⲡⲓⲧⲁⲕⲟ· <text:line-break/><text:span text:style-name="T1"> </text:span><text:span text:style-name="T2">(132/3) </text:span> ⲁⲛⲁⲩ ⲉ ⲡⲓⲟⲩⲟⲉⲓⲛ ⲡⲱⲧ’ ⲛⲥⲁ‐ <text:line-break/><text:span text:style-name="T1"> </text:span><text:span text:style-name="T2">(132/4) </text:span> ⲃⲟⲗ ⲙ ⲡⲓⲕⲁⲕⲉ· ⲙⲡⲣⲧⲣⲉⲩⲣ ϩⲁⲗ <text:line-break/><text:span text:style-name="T1"> </text:span><text:span text:style-name="T2">(132/5) </text:span> ⲙⲙⲱⲧⲛ ⲡⲣⲟⲥ ⲟⲩⲧⲁⲕⲟ· ʹ26 <text:line-break/><text:span text:style-name="T1"> </text:span><text:span text:style-name="T2">(132/6) </text:span> ⲍⲱⲥⲧⲣⲓⲁⲛⲟⲥ <text:line-break/><text:span text:style-name="T1"> </text:span><text:span text:style-name="T2">(132/7) </text:span> ⲟ̅ⲗ̅ⲍ̅ ⲗ̅ϥ̅ ⲑ̅ⲟⲃ̅ ⲁ̅ⲉϥ̣̅ ⲑ̣̅ⲱ̣ⲅ̅ ⲥ̅ⲱϯ̅ <text:line-break/><text:span text:style-name="T1"> </text:span><text:span text:style-name="T2">(132/8) </text:span> ⲩ̅ⲣ̅ϥ̅ⲑ̅ ⲛ̅ⲗⲭ̅ ⲁ̅ⲉⲗⲱ̣ⲑⲟⲃⲁⲉϥ̅· <text:line-break/><text:span text:style-name="T1"> </text:span><text:span text:style-name="T2">(132/9) </text:span> ⲑ̅ⲱ̅ ⲟ̅ⲗⲍ̅ʹ26 ⲧⲥʹ26ⲗ̅ⲑⲱⲯ̅ ʹ26[ⲗ̅ⲭ̅] </text:p>
      <text:p text:style-name="P1"/>
      <text:p text:style-name="P3">( codex VIII ) The Letter of Peter to Philip</text:p>
      <text:p text:style-name="P2"><text:span text:style-name="T1"> </text:span><text:span text:style-name="T2">(132/10) </text:span> ⲧⲉⲡⲓⲥⲧⲟⲗⲏ ⲙ ⲡⲉⲧⲣⲟⲥ ⲉⲧⲁϥ‐ <text:line-break/><text:span text:style-name="T1"> </text:span><text:span text:style-name="T2">(132/11) </text:span> ϫⲟⲟⲩⲥ ⲙ ⲫⲓⲗⲓⲡ’ⲡⲟⲥ·ʹ26 <text:line-break/><text:span text:style-name="T1"> </text:span><text:span text:style-name="T2">(132/12) </text:span> ⲡⲉⲧⲣⲟⲥ ⲡⲁⲡⲟⲥⲧⲟⲗⲟⲥ ⲛⲧⲉ ⲓ̅[ⲥ̅] <text:line-break/><text:span text:style-name="T1"> </text:span><text:span text:style-name="T2">(132/13) </text:span> ⲡⲉⲭ̅ⲥ̅ ⲙ ⲫⲓⲗⲓⲡ’ⲡⲟⲥ ⲡⲉⲛⲥⲟⲛ ⲙ̣ <text:line-break/><text:span text:style-name="T1"> </text:span><text:span text:style-name="T2">(132/14) </text:span> ⲙⲉⲣⲓⲧ’ ⲙⲛ ⲡⲉⲛϣⲃⲏⲣⲁⲡⲟⲥⲧⲟ̣‐ <text:line-break/><text:span text:style-name="T1"> </text:span><text:span text:style-name="T2">(132/15) </text:span> ⲗⲟⲥ ⲙⲛ ⲛⲥⲛⲏⲩ ⲉⲧⲛⲙⲙⲁⲕ ⲭⲉ[ⲣⲉ] <text:line-break/><text:span text:style-name="T1"> </text:span><text:span text:style-name="T2">(132/16) </text:span> ϯⲟⲩⲱϣ ⲇⲉ ⲛⲕⲓⲙⲉ ⲡⲉ̣ⲛⲥⲟⲛ ϫ̣[ⲉ] <text:line-break/><text:span text:style-name="T1"> </text:span><text:span text:style-name="T2">(132/17) </text:span> ⲁⲛϫⲓ ⲛ ϩⲉⲛⲉⲛⲧⲟⲗⲏ ⲛ̣[ⲧ]ⲟⲟⲧϥ̣ [ⲙ] <text:line-break/><text:span text:style-name="T1"> </text:span><text:span text:style-name="T2">(132/18) </text:span> ⲡⲉⲛϫⲟⲉⲓⲥ ⲙⲛ ⲡⲥⲱ̣[ⲧ]ⲏ̣ⲣ ⲛ[ⲧⲉ] <text:line-break/><text:span text:style-name="T1"> </text:span><text:span text:style-name="T2">(132/19) </text:span> ⲡⲕⲟⲥⲙⲟⲥ ⲧⲏⲣϥ ϫⲉ̣ [ⲉⲛ]ⲁⲉⲓ ⲉ[ⲩ]‐ <text:line-break/><text:span text:style-name="T1"> </text:span><text:span text:style-name="T2">(132/20) </text:span> [ⲙ]ⲁ ϫⲉ ⲉⲛⲁϯ ⲥⲃⲱ ⲁⲩ̣[ⲱ] ⲛⲧⲛⲧⲁ‐ <text:line-break/><text:span text:style-name="T1"> </text:span><text:span text:style-name="T2">(132/21) </text:span> ϣⲉ ⲟⲉⲓϣ ϩⲣⲁⲓ̈ ϩⲙ ⲡⲓⲟ̣ⲩ̣ϫⲁⲓ̈ ⲉ‐ <text:line-break/><text:span text:style-name="T1"> </text:span><text:span text:style-name="T2">(132/22) </text:span> ⲧⲁⲩⲉⲣⲏⲧ’ ⲙⲙⲟϥ ⲛⲁⲛ ⲉⲃⲟⲗ ϩⲓ‐ <text:line-break/><text:span text:style-name="T1"> </text:span><text:span text:style-name="T2">(133/1) </text:span> [ⲧ]ⲛ ⲡⲉⲛϫⲟⲉⲓⲥ ⲓ̅ⲥ̅ ⲡⲉⲭ̅[ⲥ̅·] ⲛⲧⲟⲕ ⲇⲉ <text:line-break/><text:span text:style-name="T1"> </text:span><text:span text:style-name="T2">(133/2) </text:span> [ⲛ]ⲉϣⲁⲕⲡⲱⲣϫ ⲉⲃⲟⲗ ⲙⲙⲟⲛ· ⲁⲩⲱ <text:line-break/><text:span text:style-name="T1"> </text:span><text:span text:style-name="T2">(133/3) </text:span> ⲙⲡⲉⲕⲙⲉⲣⲉ ⲡⲓⲧⲣⲉⲛⲉⲓ ⲉⲩⲙⲁ <text:line-break/><text:span text:style-name="T1"> </text:span><text:span text:style-name="T2">(133/4) </text:span> ⲁⲩⲱ ⲛⲧⲛⲉⲓⲙⲉ ϫⲉ ⲉⲛⲁⲧⲟϣⲛ ⲛ <text:line-break/><text:span text:style-name="T1"> </text:span><text:span text:style-name="T2">(133/5) </text:span> ⲁϣ ⲛ ϩⲉ ϫⲉ ⲉⲛⲁϩⲓ ϣⲙⲛⲟⲩϥⲉ· <text:line-break/><text:span text:style-name="T1"> </text:span><text:span text:style-name="T2">(133/6) </text:span> ⲉϣϫⲉ ⲟⲩⲛ ⲁⲥⲣ ⲁⲛⲁⲕ ⲡⲉⲛⲥⲟⲛ ϫⲉ <text:line-break/><text:span text:style-name="T1"> </text:span><text:span text:style-name="T2">(133/7) </text:span> ⲉⲕⲉⲉⲓ ⲕ̣ⲁⲧⲁ ⲛⲉⲛⲧⲟⲗⲏ ⲛⲧⲉ ⲡⲉⲛ‐ <text:line-break/><text:span text:style-name="T1"> </text:span><text:span text:style-name="T2">(133/8) </text:span> ⲛⲟⲩⲧⲉ̣ ⲓ̅ⲥ̅· ⲛⲁⲓ̈ ⲛⲧⲉⲣⲉϥϫⲓⲧⲟⲩ <text:line-break/><text:span text:style-name="T1"> </text:span><text:span text:style-name="T2">(133/9) </text:span> ⲛϭⲓ ⲫ[ⲓⲗⲓ]ⲡ’ⲡⲟⲥ ⲁⲩⲱ ⲛⲧⲉⲣⲉϥⲟ‐ <text:line-break/><text:span text:style-name="T1"> </text:span><text:span text:style-name="T2">(133/10) </text:span> ϣⲟⲩ ⲁϥⲃⲱⲕ ⲉⲣⲁⲧϥ ⲙ ⲡⲉⲧⲣⲟⲥ <text:line-break/><text:span text:style-name="T1"> </text:span><text:span text:style-name="T2">(133/11) </text:span> ϩⲛ ⲟⲩⲣⲁϣⲉ ⲉϥⲧⲉⲗⲏⲗ ⲙⲙⲟϥ· <text:line-break/><text:span text:style-name="T1"> </text:span><text:span text:style-name="T2">(133/12) </text:span> ⲧⲟⲧⲉ ⲁⲡⲉⲧⲣⲟⲥ ⲁϥⲥⲱⲟⲩϩ <text:line-break/><text:span text:style-name="T1"> </text:span><text:span text:style-name="T2">(133/13) </text:span> ⲙ ⲡⲕⲉⲥⲉⲉⲡⲉ ⲁⲩⲃⲱⲕ ⲉϫⲙ <text:line-break/><text:span text:style-name="T1"> </text:span><text:span text:style-name="T2">(133/14) </text:span> ⲡⲧⲟⲟⲩ ⲉⲧⲉϣⲁⲩⲙⲟⲩⲧⲉ ⲉⲣⲟϥ <text:line-break/><text:span text:style-name="T1"> </text:span><text:span text:style-name="T2">(133/15) </text:span> ϫⲉ ⲡⲁⲛⲓϫⲟⲉⲓⲧ’ ⲡⲙⲁ ⲉⲧⲉϣⲁⲩ‐ <text:line-break/><text:span text:style-name="T1"> </text:span><text:span text:style-name="T2">(133/16) </text:span> ⲥⲱⲟⲩϩ ⲉⲙⲁⲩ ⲙⲛ ⲡⲙⲁⲕⲁⲣⲓⲟⲥ <text:line-break/><text:span text:style-name="T1"> </text:span><text:span text:style-name="T2">(133/17) </text:span> ⲛ ⲭ̅ⲥ̅ ϩⲟⲧⲁⲛ ⲉϥϩⲛ ⲥⲱⲙⲁ· ⲧⲟ‐ <text:line-break/><text:span text:style-name="T1"> </text:span><text:span text:style-name="T2">(133/18) </text:span> ⲧⲉ ⲛⲧⲉⲣⲟⲩⲉⲓ ⲉⲩⲙⲁ ⲛϭⲓ ⲛⲁⲡⲟⲥ‐ <text:line-break/><text:span text:style-name="T1"> </text:span><text:span text:style-name="T2">(133/19) </text:span> ⲧⲟⲗⲟⲥ ⲁⲩⲱ ⲁⲩⲛⲟϫⲟⲩ ⲉϫⲛ <text:line-break/><text:span text:style-name="T1"> </text:span><text:span text:style-name="T2">(133/20) </text:span> ⲛⲉⲩⲡⲁⲧ’ ⲁⲩϣⲗⲏⲗ ⲛ ϯϩⲉ ⲉⲩ‐ <text:line-break/><text:span text:style-name="T1"> </text:span><text:span text:style-name="T2">(133/21) </text:span> ϫ̣ⲱ ⲙ[ⲙⲟ]ⲥ ϫⲉ ⲡⲓⲱⲧ’ ⲡⲓⲱⲧ’ <text:line-break/><text:span text:style-name="T1"> </text:span><text:span text:style-name="T2">(133/22) </text:span> ⲡ̣ⲓⲱⲧ’̣ ⲛⲧⲉ ⲡⲟⲩⲟⲉⲓⲛ ⲡⲁⲓ̈ ⲉ‐ <text:line-break/><text:span text:style-name="T1"> </text:span><text:span text:style-name="T2">(133/23) </text:span> ⲧⲉⲩⲛⲧ̣ⲁϥ ⲛ ⲛⲓⲁⲫⲑⲁⲣⲥⲓⲁ <text:line-break/><text:span text:style-name="T1"> </text:span><text:span text:style-name="T2">(133/24) </text:span> ⲥⲱⲧ[ⲙ] ⲉⲣⲟⲛ ⲕⲁⲧⲁ ⲑⲉ ⲉⲧⲁ[..] <text:line-break/><text:span text:style-name="T1"> </text:span><text:span text:style-name="T2">(133/25) </text:span> ⲙ ⲧⲱ̣[.]ⲩ ϩⲙ ⲡⲉⲕⲁⲗⲟⲩ ⲉⲧ’‐ <text:line-break/><text:span text:style-name="T1"> </text:span><text:span text:style-name="T2">(133/26) </text:span> ⲟⲩⲁⲁⲃ̣ [ⲓ%7]ⲥ̅ ⲡⲉⲭ̅ⲥ̅· ⲛⲧⲟϥ ⲅⲁⲣ <text:line-break/><text:span text:style-name="T1"> </text:span><text:span text:style-name="T2">(133/27) </text:span> ⲁϥϣⲱⲡⲉ ⲛⲁⲛ ⲛ ⲟⲩⲫⲱⲥⲧⲏⲣ <text:line-break/><text:span text:style-name="T1"> </text:span><text:span text:style-name="T2">(134/1) </text:span> ϩⲙ ⲡⲕⲁ̣ⲕ̣ⲉ ⲁⲉⲓⲟ ⲥⲱⲧⲙ ⲉⲣⲟ̣[ⲛ]· <text:line-break/><text:span text:style-name="T1"> </text:span><text:span text:style-name="T2">(134/2) </text:span> ⲁⲩⲱ ⲁⲩⲕⲟⲧⲟⲩ ⲛⲕⲉⲥⲟⲡ’ ⲁⲩ‐ <text:line-break/><text:span text:style-name="T1"> </text:span><text:span text:style-name="T2">(134/3) </text:span> ϣⲗⲏⲗ ⲉⲩϫⲱ ⲙⲙⲟⲥ ϫⲉ ⲡϣⲏ‐ <text:line-break/><text:span text:style-name="T1"> </text:span><text:span text:style-name="T2">(134/4) </text:span> ⲣⲉ ⲛⲧⲉ ⲡⲱⲛϩ ⲡϣⲏⲣⲉ ⲛⲧⲉ ϯ‐ <text:line-break/><text:span text:style-name="T1"> </text:span><text:span text:style-name="T2">(134/5) </text:span> ⲙⲛⲧ’ⲁⲧⲙⲟⲩ· ⲡⲁⲓ̈ ⲉⲧ’ϣⲟⲟⲡ’ ϩⲙ <text:line-break/><text:span text:style-name="T1"> </text:span><text:span text:style-name="T2">(134/6) </text:span> ⲡⲟⲩⲟⲉⲓⲛ· ⲡϣⲏⲣⲉ ⲡⲉⲭ̅ⲥ̅ ⲛⲧⲉ <text:line-break/><text:span text:style-name="T1"> </text:span><text:span text:style-name="T2">(134/7) </text:span> ϯⲙⲛⲧ’ⲁⲧⲙⲟⲩ· ⲡⲉⲛⲣⲉ̣ϥⲥⲱⲧⲉ <text:line-break/><text:soft-page-break/><text:span text:style-name="T1"> </text:span><text:span text:style-name="T2">(134/8) </text:span> ⲙⲁϯ ⲛⲁⲛ ⲛⲛ ⲟⲩϭⲁⲙ· ⲉⲡⲓⲇⲏ ⲥⲉ‐ <text:line-break/><text:span text:style-name="T1"> </text:span><text:span text:style-name="T2">(134/9) </text:span> ⲕⲱⲧⲉ ⲛⲥⲱⲛ ⲉϩⲟⲧⲃⲛ [ⲧ]ⲟ̣ⲧⲉ ⲁϥ‐ <text:line-break/><text:span text:style-name="T1"> </text:span><text:span text:style-name="T2">(134/10) </text:span> ⲟⲩⲱⲛϩ ⲉⲃⲟⲗ ⲛϭⲓ ⲟⲩⲛⲟϭ ⲛ ⲟⲩⲟⲉⲓ̣[ⲛ] <text:line-break/><text:span text:style-name="T1"> </text:span><text:span text:style-name="T2">(134/11) </text:span> ϩⲱⲥⲧⲉ ⲛⲧⲉⲡⲓⲧⲟⲟⲩ ⲣ ⲟⲩⲟⲉⲓⲛ <text:line-break/><text:span text:style-name="T1"> </text:span><text:span text:style-name="T2">(134/12) </text:span> ⲉⲃⲟⲗ ϩⲙ ⲡⲓⲱⲣϩ ⲛⲧⲉ ⲡⲏ ⲉⲧⲁϥⲟⲩ‐ <text:line-break/><text:span text:style-name="T1"> </text:span><text:span text:style-name="T2">(134/13) </text:span> ⲱⲛϩ ⲉⲃⲟⲗ· ⲁⲩⲱ ⲁⲩⲥⲙⲏ ⲁⲥⲱϣ <text:line-break/><text:span text:style-name="T1"> </text:span><text:span text:style-name="T2">(134/14) </text:span> ⲉⲃⲟⲗ ϣⲁⲣⲟⲟⲩ ⲉⲥϫⲱ ⲙⲙⲟⲥ ϫⲉ <text:line-break/><text:span text:style-name="T1"> </text:span><text:span text:style-name="T2">(134/15) </text:span> ϫⲓ ⲥⲙⲏ ⲉ ⲛⲁϣⲁϫⲉ ϫⲉ ⲉⲉⲓⲉϫⲱ̣ <text:line-break/><text:span text:style-name="T1"> </text:span><text:span text:style-name="T2">(134/16) </text:span> ⲛⲏⲧⲛ· ⲉⲧⲃⲉ ⲟⲩ ⲧⲉⲧⲛϣⲓⲛⲉ ⲙ‐ <text:line-break/><text:span text:style-name="T1"> </text:span><text:span text:style-name="T2">(134/17) </text:span> ⲙⲟⲉⲓ ⲁⲛⲟⲕ ⲡⲉ ⲓ̅ⲥ̅ ⲡⲉⲭ̅ⲥ̅ ⲉⲧ’ϣ[ⲟ]‐ <text:line-break/><text:span text:style-name="T1"> </text:span><text:span text:style-name="T2">(134/18) </text:span> ⲟⲡ’ ⲙⲛ ⲧⲏⲩⲧⲛ ϣⲁ ⲉⲛⲉϩ· ⲧⲟⲧ[ⲉ] <text:line-break/><text:span text:style-name="T1"> </text:span><text:span text:style-name="T2">(134/19) </text:span> ⲁⲛⲁⲡⲟⲥⲧⲟⲗⲟⲥ ⲁⲩⲟⲩⲱϣ̣[ⲧ’] <text:line-break/><text:span text:style-name="T1"> </text:span><text:span text:style-name="T2">(134/20) </text:span> ⲁⲩⲱ ⲛⲁⲩϫⲱ ⲙ̅ⲙⲟⲥ ϫⲉ ⲡϫⲟ̣‐ <text:line-break/><text:span text:style-name="T1"> </text:span><text:span text:style-name="T2">(134/21) </text:span> ⲉⲓⲥ ⲧⲛⲟⲩⲱϣ ⲉⲉⲓⲙⲉ ⲉ ⲡϣⲱ̣‐ <text:line-break/><text:span text:style-name="T1"> </text:span><text:span text:style-name="T2">(134/22) </text:span> ⲱⲧ’ ⲛⲧⲉ ⲛⲉⲱⲛ ⲙⲛ ⲡⲉⲕⲡⲗⲏ‐ <text:line-break/><text:span text:style-name="T1"> </text:span><text:span text:style-name="T2">(134/23) </text:span> ⲣ̣ⲱⲙⲁ· ⲁⲩⲱ ϫⲉ ⲡⲱ̣[ⲥ] ⲥⲉⲁⲙⲁ[ϩ]‐ <text:line-break/><text:span text:style-name="T1"> </text:span><text:span text:style-name="T2">(134/24) </text:span> ⲧⲉ ⲙⲙⲟⲛ ϩⲙ ⲡⲓⲙⲁ ⲛ ϣ̣ⲱⲡⲉ· <text:line-break/><text:span text:style-name="T1"> </text:span><text:span text:style-name="T2">(134/25) </text:span> ⲏ%0 ⲡⲱⲥ ⲁⲛⲉⲓ ⲉ ⲡⲓⲙⲁ ⲏ%0 ⲉⲛⲁⲃⲱⲕ <text:line-break/><text:span text:style-name="T1"> </text:span><text:span text:style-name="T2">(134/26) </text:span> ⲛ ⲁϣ ⲛ ⲣⲏⲧⲉ· ⲏ%0 ⲡⲱⲥ ⲟⲩⲛⲧⲁⲛ <text:line-break/><text:span text:style-name="T1"> </text:span><text:span text:style-name="T2">(135/1) </text:span> [ⲛ ϯⲉⲝ]ⲟ̣ⲩⲥⲓⲁ ⲛⲧⲉ ϯⲡⲁ̣ⲣϩⲏⲥⲓⲁ· <text:line-break/><text:span text:style-name="T1"> </text:span><text:span text:style-name="T2">(135/2) </text:span> [ⲏ%0] ⲉⲧ̣ⲃⲉ ⲟⲩ ⲛⲓϭⲟⲙ ⲥⲉϯ ⲛⲙⲙⲁⲛ· <text:line-break/><text:span text:style-name="T1"> </text:span><text:span text:style-name="T2">(135/3) </text:span> ⲧⲟⲧⲉ ⲁⲩⲥⲙⲏ ϣⲱⲡⲉ ⲛⲁⲩ ⲉⲃⲟⲗ <text:line-break/><text:span text:style-name="T1"> </text:span><text:span text:style-name="T2">(135/4) </text:span> ϩⲙ ⲡⲟ̣ⲩⲟⲉⲓⲛ ⲉⲥϫⲱ ⲙⲙⲟⲥ ϫⲉ ⲛ‐ <text:line-break/><text:span text:style-name="T1"> </text:span><text:span text:style-name="T2">(135/5) </text:span> ⲧⲱⲧⲛ ⲟⲩⲁⲧ’ ⲧⲏⲩⲧⲛ ⲉⲧⲣ ⲙⲛ‐ <text:line-break/><text:span text:style-name="T1"> </text:span><text:span text:style-name="T2">(135/6) </text:span> ⲧⲣⲉ ϫⲉ ⲁⲉⲓϫⲉ ⲛⲁⲓ̈ ⲧⲏⲣⲟⲩ ⲛⲏⲧⲛ <text:line-break/><text:span text:style-name="T1"> </text:span><text:span text:style-name="T2">(135/7) </text:span> ⲁⲗ̣[ⲗ]ⲁ [ⲉ]ⲧ̣ⲃⲉ ⲧⲉⲧⲛⲙⲛⲧ’ⲁⲧⲛⲁϩⲧⲉ <text:line-break/><text:span text:style-name="T1"> </text:span><text:span text:style-name="T2">(135/8) </text:span> ϯ[ⲛ]ⲁϣ̣ⲁϫⲉ ⲛ ⲕⲉⲥⲟⲡ’· ⲉⲧⲃⲉ <text:line-break/><text:span text:style-name="T1"> </text:span><text:span text:style-name="T2">(135/9) </text:span> [ⲡϣⲱ]ⲱ̣ⲧ’ ⲙⲉⲛ ⲛⲧⲉ ⲛⲉⲱⲛ ⲡⲁⲓ̈ <text:line-break/><text:span text:style-name="T1"> </text:span><text:span text:style-name="T2">(135/10) </text:span> [ⲡⲉ] ⲡⲓϣⲱⲱⲧ’ ⲉⲧ〈ⲁ〉ϯⲙ̅ⲛ̅ⲧ̅’̅ⲁⲧ’‐ <text:line-break/><text:span text:style-name="T1"> </text:span><text:span text:style-name="T2">(135/11) </text:span> ⲥ̣ⲱⲧⲙ ⲇⲉ ⲙⲛ ϯⲙⲛⲧ’ⲁⲧ’ϣⲟϫⲛⲉ <text:line-break/><text:span text:style-name="T1"> </text:span><text:span text:style-name="T2">(135/12) </text:span> ⲛ̅ⲧⲉ ⲧⲙⲁⲁⲩ ⲉⲧⲁⲥⲟⲩⲱⲛ̅ϩ̅ ⲉⲃⲟⲗ <text:line-break/><text:span text:style-name="T1"> </text:span><text:span text:style-name="T2">(135/13) </text:span> ⲉϫⲙ ⲡⲟⲩⲁϩ ⲥⲁϩⲛⲉ ⲛ̅ⲧⲉ ϯⲙⲛⲧ’‐ <text:line-break/><text:span text:style-name="T1"> </text:span><text:span text:style-name="T2">(135/14) </text:span> ⲛⲟϭ ⲛⲧⲉ ⲡⲓⲱⲧ’· ⲁⲥⲟⲩⲱϣ ⲉ <text:line-break/><text:span text:style-name="T1"> </text:span><text:span text:style-name="T2">(135/15) </text:span> ⲧⲟⲩⲛⲟⲥ ⲛ ϩⲉⲛⲉⲱⲛ ⲁⲩⲱ ⲉⲧⲁⲥ‐ <text:line-break/><text:span text:style-name="T1"> </text:span><text:span text:style-name="T2">(135/16) </text:span> ϣ̣ⲁϫⲉ ⲁϥⲟⲩⲱ〈ⲛ〉ϩ ⲉⲃⲟⲗ ⲛϭⲓ ⲡⲓⲁⲩ‐ <text:line-break/><text:span text:style-name="T1"> </text:span><text:span text:style-name="T2">(135/17) </text:span> ⲑ̣ⲁⲇⲏⲥ· ⲉⲧⲁⲥϣⲱϫⲡ’ ⲇⲉ ⲛ ⲟⲩ‐ <text:line-break/><text:span text:style-name="T1"> </text:span><text:span text:style-name="T2">(135/18) </text:span> ⲙⲉⲣⲟⲥ ⲁϥⲁⲙⲁϩⲧⲉ ⲙⲙⲟϥ ⲛϭⲓ ⲡⲓ‐ <text:line-break/><text:span text:style-name="T1"> </text:span><text:span text:style-name="T2">(135/19) </text:span> ⲁⲩⲑⲁⲇⲏⲥ· ⲁⲩⲱ ⲁϥϣⲱⲡⲉ ⲛ <text:line-break/><text:span text:style-name="T1"> </text:span><text:span text:style-name="T2">(135/20) </text:span> ⲟⲩϣⲱⲱⲧ’ ⲡⲁⲓ̈ ⲡⲉ ⲡϣⲱⲱⲧ’ <text:line-break/><text:span text:style-name="T1"> </text:span><text:span text:style-name="T2">(135/21) </text:span> [ⲛ]ⲧⲉ ⲛⲓⲉ̣ⲱⲛ· ⲉⲧⲁⲡⲓⲁⲩⲑⲁⲇⲏⲥ <text:line-break/><text:span text:style-name="T1"> </text:span><text:span text:style-name="T2">(135/22) </text:span> ϭ̣ⲉ ⲉⲧⲁϥϫⲓ ⲛ ⲟⲩⲙⲉⲣⲟⲥ ⲁϥϫⲟϥ <text:line-break/><text:span text:style-name="T1"> </text:span><text:span text:style-name="T2">(135/23) </text:span> ⲁⲩⲱ ⲁϥⲕⲱ ⲛ ϩⲉⲛϭⲟⲙ ⲉϩⲣⲁⲓ̈ <text:line-break/><text:span text:style-name="T1"> </text:span><text:span text:style-name="T2">(135/24) </text:span> ⲉϫⲱϥ ⲙⲛ ϩⲉⲛⲉⲝⲟⲩⲥⲓⲁ· <text:line-break/><text:span text:style-name="T1"> </text:span><text:span text:style-name="T2">(135/25) </text:span> ⲁⲩⲱ [ⲁ]ϥⲟⲗϥ ⲉϩⲟⲩⲛ ⲉ ⲛⲓⲉⲱ̣ⲛ <text:line-break/><text:span text:style-name="T1"> </text:span><text:span text:style-name="T2">(135/26) </text:span> ⲉⲧ’ⲙⲟ̣[ⲟ]ⲩⲧ’· ⲁⲩⲱ ⲁⲩⲣⲁϣⲉ <text:line-break/><text:span text:style-name="T1"> </text:span><text:span text:style-name="T2">(135/27) </text:span> ⲛϭⲓ ⲛⲓϭⲟⲙ ⲧⲏⲣⲟⲩ ⲛⲧⲉ ⲡⲕⲟⲥ‐ <text:line-break/><text:span text:style-name="T1"> </text:span><text:span text:style-name="T2">(135/28) </text:span> ⲙⲟⲥ ϫⲉ ⲁⲩϫⲡⲟⲟⲩ· ⲛⲧⲟⲟⲩ <text:line-break/><text:soft-page-break/><text:span text:style-name="T1"> </text:span><text:span text:style-name="T2">(136/1) </text:span> ⲇⲉ ⲛⲥⲉ̣ⲥ̣ⲟ̣ⲟⲩⲛ ⲁⲛ ⲙ ⲡⲓ̣[..ⲉⲧⲣ <text:line-break/><text:span text:style-name="T1"> </text:span><text:span text:style-name="T2">(136/2) </text:span> ϣⲣⲡ’ ⲛ ϣⲟⲟⲡ’· ⲉⲡⲓⲇⲏ ϩⲉⲛ̣ϣⲙ‐ <text:line-break/><text:span text:style-name="T1"> </text:span><text:span text:style-name="T2">(136/3) </text:span> ⲙⲟ ⲙⲙⲟϥ ⲛⲉ· ⲁⲗⲗⲁ ⲡⲁⲓ̈ ⲡ[ⲉ]ⲧⲉⲁ[ⲩ]‐ <text:line-break/><text:span text:style-name="T1"> </text:span><text:span text:style-name="T2">(136/4) </text:span> ϯ ϭⲟⲙ ⲛⲁϥ ⲁⲩⲱ ⲁⲩϣⲙϣ̣ⲉ ⲙⲙⲟϥ̣ <text:line-break/><text:span text:style-name="T1"> </text:span><text:span text:style-name="T2">(136/5) </text:span> ⲉⲁⲩⲥⲙⲟⲩ ⲉⲣⲟϥ· ⲛⲧⲟϥ ⲇⲉ̣ ⲡⲓⲁⲩ‐ <text:line-break/><text:span text:style-name="T1"> </text:span><text:span text:style-name="T2">(136/6) </text:span> ⲑⲁⲇⲏⲥ ⲁϥϫⲓⲥⲉ ⲛ ϩⲏⲧ’ ⲉϩⲣⲁⲓ̈ ⲉ̣ϫⲙ <text:line-break/><text:span text:style-name="T1"> </text:span><text:span text:style-name="T2">(136/7) </text:span> ⲡⲓⲥⲙⲟⲩ ⲛⲧⲉ ⲛⲓϭⲟⲙ· ⲁϥ[ϣ]ⲱⲡ̣[ⲉ] ⲛ <text:line-break/><text:span text:style-name="T1"> </text:span><text:span text:style-name="T2">(136/8) </text:span> ⲟⲩⲣⲉϥⲕⲱϩ· ⲁⲩⲱ ⲁϥⲟ[ⲩ]ⲱ̣ϣ̣ [ⲉ]ⲧ̣ⲁ‐ <text:line-break/><text:span text:style-name="T1"> </text:span><text:span text:style-name="T2">(136/9) </text:span> ⲙⲓⲟ ⲛⲛ ⲟⲩϩⲓⲕⲱⲛ ⲉ ⲡⲙ[ⲁ ⲛⲛ ⲟⲩϩⲓⲕⲱⲛ] <text:line-break/><text:span text:style-name="T1"> </text:span><text:span text:style-name="T2">(136/10) </text:span> ⲙⲛ ⲟⲩⲙⲟⲣⲫⲏ ⲉ ⲡⲙⲁ ⲛⲛ̣ ⲟⲩⲙ̣[ⲟⲣ]‐ <text:line-break/><text:span text:style-name="T1"> </text:span><text:span text:style-name="T2">(136/11) </text:span> ⲫⲏ· ⲁϥⲧⲱϣ ⲇⲉ ⲛ ⲛⲓϭⲟⲙ ϩⲣⲁⲓ̈ ϩⲛ̣ <text:line-break/><text:span text:style-name="T1"> </text:span><text:span text:style-name="T2">(136/12) </text:span> ⲧⲉϥⲉⲝⲟⲩⲥⲓⲁ ϫⲉ ⲉⲩⲉⲡⲗⲁⲥⲥⲁ ⲛ ϩⲉ̣[ⲛ]‐ <text:line-break/><text:span text:style-name="T1"> </text:span><text:span text:style-name="T2">(136/13) </text:span> ⲥⲱⲙⲁ ⲉⲩⲙⲟⲟⲩⲧ’· ⲁⲩⲱ ⲁⲩϣⲱ̣‐ <text:line-break/><text:span text:style-name="T1"> </text:span><text:span text:style-name="T2">(136/14) </text:span> ⲡⲉ ⲉⲃⲟⲗ ϩⲛ ⲟⲩⲙⲛⲧ’ⲁⲧ’ⲉⲓⲛⲉ ⲉⲃⲟⲗ̣ <text:line-break/><text:span text:style-name="T1"> </text:span><text:span text:style-name="T2">(136/15) </text:span> ϩⲛ ϯⲉⲓⲇⲉⲁ ⲉⲧⲉⲁⲥϣⲱⲡⲉ· ʹ264ʹ264ʹ264ʹ264 <text:line-break/><text:span text:style-name="T1"> </text:span><text:span text:style-name="T2">(136/16) </text:span> ⲉⲧⲃⲉ ⲡⲓⲡⲗⲏⲣⲱⲙⲁ ⲇⲉ ⲁⲛⲟⲕ ⲡⲉ ⲁ̣[ⲩⲱ] <text:line-break/><text:span text:style-name="T1"> </text:span><text:span text:style-name="T2">(136/17) </text:span> ⲁⲩⲧⲛⲛⲟⲟⲩⲧ’ ⲉϩⲣⲁⲓ̈ ϩⲙ ⲡⲥⲱⲙⲁ ⲉ̣‐ <text:line-break/><text:span text:style-name="T1"> </text:span><text:span text:style-name="T2">(136/18) </text:span> ⲧⲃⲉ ⲡⲓⲥⲡⲉⲣⲙⲁ ⲉⲧⲉⲁϥϩⲉ ⲉⲃⲟⲗ <text:line-break/><text:span text:style-name="T1"> </text:span><text:span text:style-name="T2">(136/19) </text:span> ⲁⲩⲱ ⲁⲓ̈ⲉⲓ ⲉϩⲣⲁⲓ̈ ⲉ ⲡⲉⲩⲡⲗⲁⲥⲙⲁ ⲉⲧ̣‐ <text:line-break/><text:span text:style-name="T1"> </text:span><text:span text:style-name="T2">(136/20) </text:span> ⲙⲟⲟⲩⲧ’· ⲛⲧⲟⲟⲩ ⲇⲉ ⲙⲡⲟⲩⲥ̣[ⲟⲩ]‐ <text:line-break/><text:span text:style-name="T1"> </text:span><text:span text:style-name="T2">(136/21) </text:span> ⲱⲛⲧ’ ⲛⲉⲩⲙⲉⲉⲩⲉ ⲉⲣⲟⲉⲓ ϫⲉ ⲁⲛ[ⲟⲕ] <text:line-break/><text:span text:style-name="T1"> </text:span><text:span text:style-name="T2">(136/22) </text:span> ⲟⲩⲣⲱⲙⲉ ⲉϥⲙⲟⲟⲩⲧ’· ⲁⲩⲱ ⲁⲓ̈ϣ[ⲁ]‐ <text:line-break/><text:span text:style-name="T1"> </text:span><text:span text:style-name="T2">(136/23) </text:span> ϫⲉ ⲙⲛ ⲡⲉⲧⲉ ⲡⲱⲓ̈ ⲛⲧⲟϥ ⲇⲉ ⲁϥⲥⲱ‐ <text:line-break/><text:span text:style-name="T1"> </text:span><text:span text:style-name="T2">(136/24) </text:span> ⲧⲙ ⲛⲁⲓ̈ ⲕⲁⲧⲁ ⲧⲉⲧⲛϩ[ⲉ] ϩⲱⲧ’ <text:line-break/><text:span text:style-name="T1"> </text:span><text:span text:style-name="T2">(136/25) </text:span> ⲧⲏⲩⲧⲛ ⲛⲁⲓ̈ ⲉⲧ’ⲁⲩⲥⲱ[ⲧ]ⲙ ⲙⲡⲟⲟⲩ̣ <text:line-break/><text:span text:style-name="T1"> </text:span><text:span text:style-name="T2">(136/26) </text:span> ⲁⲩⲱ ⲁⲓ̈ϯ ⲛⲁϥ ⲛⲛ ⲟⲩⲉⲝ̣ⲟⲩⲥⲓⲁ ϫⲉ· <text:line-break/><text:span text:style-name="T1"> </text:span><text:span text:style-name="T2">(136/27) </text:span> ⲉϥⲉⲉⲓ ⲉϩⲟⲩⲛ ⲉ ϯⲕⲗⲏⲣⲟⲛⲟⲙⲓⲁ <text:line-break/><text:span text:style-name="T1"> </text:span><text:span text:style-name="T2">(136/28) </text:span> ⲛⲧⲉ ⲧⲉϥⲙⲛⲧ’ⲉⲓⲱⲧ’· ⲁⲩⲱ ⲁⲓ̈ϥⲓ <text:line-break/><text:span text:style-name="T1"> </text:span><text:span text:style-name="T2">(137/1) </text:span> [ ]ⲩⲙⲟⲩϩ ⲉⲃⲟⲗ <text:line-break/><text:span text:style-name="T1"> </text:span><text:span text:style-name="T2">(137/2) </text:span> [....]. ⲛϩⲣⲁ̣ⲓ̈ ϩⲙ ⲡⲉϥⲟⲩϫⲁⲓ̈· ⲉⲡⲓⲇⲏ <text:line-break/><text:span text:style-name="T1"> </text:span><text:span text:style-name="T2">(137/3) </text:span> [ⲇⲉ] ϫⲉ ⲛ[ⲉ]ⲟⲩϣⲱ̣ⲱⲧ’ ⲡⲉ ⲉⲧⲃⲉ ⲡⲁⲓ̈ ⲁϥ‐ <text:line-break/><text:span text:style-name="T1"> </text:span><text:span text:style-name="T2">(137/4) </text:span> ϣⲱⲡⲉ̣ [ⲛ] ⲟⲩⲡ̣ⲗⲏⲣⲱⲙⲁ· ⲉⲧⲃⲉ ⲡⲏ <text:line-break/><text:span text:style-name="T1"> </text:span><text:span text:style-name="T2">(137/5) </text:span> [ⲇ]ⲉ ϫⲉ ⲥⲉⲁⲙⲁ̣ϩⲧⲉ ⲙⲙⲱⲧⲛ ϫⲉ ⲛⲧⲱⲧⲛ <text:line-break/><text:span text:style-name="T1"> </text:span><text:span text:style-name="T2">(137/6) </text:span> ⲛⲉⲧⲉ ⲛⲟⲩⲉⲓ· ⲉϣⲱⲡⲉ ⲉⲧⲉⲧⲛⲁⲕⲁⲕ <text:line-break/><text:span text:style-name="T1"> </text:span><text:span text:style-name="T2">(137/7) </text:span> ⲧⲏⲛⲉ ⲕⲁϩⲏⲩ ⲙ ⲡⲁⲓ̈ ⲉⲧ’ⲧⲁⲕⲏⲟⲩⲧ’· ⲧⲟ‐ <text:line-break/><text:span text:style-name="T1"> </text:span><text:span text:style-name="T2">(137/8) </text:span> ⲧⲉ ⲉⲧⲉⲧⲛⲁϣⲱⲡⲉ ⲛ ϩⲉⲛⲫⲱⲥⲧⲏⲣ <text:line-break/><text:span text:style-name="T1"> </text:span><text:span text:style-name="T2">(137/9) </text:span> ϩⲛ ⲧⲙⲏⲧⲉ ⲛ ϩⲉⲛⲣⲱⲙⲉ ⲉⲩⲙⲟⲟⲩⲧ’ <text:line-break/><text:span text:style-name="T1"> </text:span><text:span text:style-name="T2">(137/10) </text:span> ⲡⲏ ⲇ[ⲉ] ϫⲉ ⲛ̣ⲧⲱⲧⲛ ⲉⲧⲛⲁϯ ⲙⲛ ⲛⲓϭⲟⲙ <text:line-break/><text:span text:style-name="T1"> </text:span><text:span text:style-name="T2">(137/11) </text:span> ϫⲉ ⲛ[ⲧ]ⲟⲟ̣ⲩ̣ ⲙⲙⲛⲧⲁⲩ ⲛ ⲟⲩⲙⲧⲟⲛ ⲕⲁ‐ <text:line-break/><text:span text:style-name="T1"> </text:span><text:span text:style-name="T2">(137/12) </text:span> [ⲧⲁ] ⲧ̣ⲉ̣ⲧⲛϩⲉ· ⲉⲡⲓⲇⲏ ⲛⲥⲉⲟⲩⲱϣ ⲁⲛ <text:line-break/><text:span text:style-name="T1"> </text:span><text:span text:style-name="T2">(137/13) </text:span> [ϩⲓ]ⲛ̣ⲁ ⲛⲧⲉⲧⲛⲛⲟⲩϩⲙ· ⲧⲟⲧⲉ ⲁⲛⲁⲡⲟⲥ‐ <text:line-break/><text:span text:style-name="T1"> </text:span><text:span text:style-name="T2">(137/14) </text:span> [ⲧ]ⲟ̣ⲗⲟⲥ ⲟⲩⲱϣⲧ’ ⲛ ⲕⲉⲥⲟ̣ⲡ’ ⲉⲩϫⲱ ⲙ‐ <text:line-break/><text:span text:style-name="T1"> </text:span><text:span text:style-name="T2">(137/15) </text:span> ⲙ̣ⲟⲥ ϫⲉ ⲡϫⲟⲉⲓⲥ ⲙⲁⲧⲁⲙⲟⲛ ϫⲉ ⲁϣ <text:line-break/><text:span text:style-name="T1"> </text:span><text:span text:style-name="T2">(137/16) </text:span> [ⲧ]ⲉ ⲑⲉ ⲉⲧⲛⲛⲁϯ ⲙⲛ ⲛⲓⲁⲣⲭⲱⲛ· ⲉⲡⲓⲇⲏ <text:line-break/><text:span text:style-name="T1"> </text:span><text:span text:style-name="T2">(137/17) </text:span> [ⲛⲓⲁ]ⲣⲭⲱⲛ ⲥⲉⲛ ⲧⲡⲉ ⲙⲙⲟⲛ· ⲧⲟⲧⲉ <text:line-break/><text:span text:style-name="T1"> </text:span><text:span text:style-name="T2">(137/18) </text:span> [ⲁⲩⲥ]ⲙⲏ ⲁⲥⲱϣ ⲉⲃⲟⲗ ϣⲁⲣⲟⲟⲩ ⲉⲃⲟⲗ <text:line-break/><text:span text:style-name="T1"> </text:span><text:span text:style-name="T2">(137/19) </text:span> [ϩ]ⲙ̣ ⲡⲏ ⲉⲧⲉ ⲛⲉϥⲟⲩⲟⲛϩ ⲉⲃⲟⲗ ⲉⲥϫⲱ <text:line-break/><text:soft-page-break/><text:span text:style-name="T1"> </text:span><text:span text:style-name="T2">(137/20) </text:span> [ⲙ]ⲙⲟⲥ ϫⲉ ⲛⲧⲱⲧⲛ ⲇⲉ ⲉⲧⲉⲧⲛⲁϯ <text:line-break/><text:span text:style-name="T1"> </text:span><text:span text:style-name="T2">(137/21) </text:span> [ⲛ]ⲙ̣ⲙⲁⲩ ⲛ ϯϩⲉ· ⲛⲓⲁⲣⲭⲱⲛ ⲅⲁⲣ ⲉⲩϯ <text:line-break/><text:span text:style-name="T1"> </text:span><text:span text:style-name="T2">(137/22) </text:span> ⲙ̣ⲛ ⲡⲓⲣⲱⲙⲉ ⲉⲧ’ⲥⲁϩⲟⲩⲛ· ⲛⲧⲱⲧⲛ <text:line-break/><text:span text:style-name="T1"> </text:span><text:span text:style-name="T2">(137/23) </text:span> [ⲇ]ⲉ ⲉⲧⲉⲧⲛⲉϯ ⲛⲙⲙⲁⲩ ⲛ ϯϩⲉ· ⲁⲙⲏ‐ <text:line-break/><text:span text:style-name="T1"> </text:span><text:span text:style-name="T2">(137/24) </text:span> ⲉⲓⲧⲛ ⲉⲩⲙⲁ ⲁⲩⲱ ϯ ⲥⲃⲱ ϩⲙ ⲡⲕⲟⲥ‐ <text:line-break/><text:span text:style-name="T1"> </text:span><text:span text:style-name="T2">(137/25) </text:span> ⲙⲟⲥ ⲙⲡⲓⲟⲩϫⲁⲓ̈ ϩⲛ ⲟⲩⲉⲣⲏⲧ’· ⲁⲩⲱ <text:line-break/><text:span text:style-name="T1"> </text:span><text:span text:style-name="T2">(137/26) </text:span> ⲛⲧⲱⲧⲛ ϩⲱⲕ ⲧⲏⲩⲧⲛ ⲛϩⲣⲁⲓ̈ ϩⲛ ϯϭⲟⲙ <text:line-break/><text:span text:style-name="T1"> </text:span><text:span text:style-name="T2">(137/27) </text:span> ⲛⲧⲉ ⲡⲁ[ⲉ]ⲓⲱⲧ’· ⲁⲩⲱ ⲟⲩⲱⲛϩ ⲙ <text:line-break/><text:span text:style-name="T1"> </text:span><text:span text:style-name="T2">(137/28) </text:span> ⲡⲉⲧⲛⲧⲱ̣ⲃϩ ⲉⲃⲟⲗ· ⲁⲩⲱ ⲛⲧⲟϥ ⲡⲓ‐ <text:line-break/><text:span text:style-name="T1"> </text:span><text:span text:style-name="T2">(137/29) </text:span> ⲱⲧ’ ϥⲛⲁⲣ ⲃⲟⲏⲑⲓ ⲉⲣⲱⲧⲛ· ϩⲱⲥ ⲉⲁϥ‐ <text:line-break/><text:span text:style-name="T1"> </text:span><text:span text:style-name="T2">(137/30) </text:span> ⲣ ⲃⲟⲏⲑⲓ ⲉⲣⲱⲧⲛ ⲉⲁϥⲧⲁⲩⲟ ϩⲓ <text:line-break/><text:span text:style-name="T1"> </text:span><text:span text:style-name="T2">(138/1) </text:span> ⲙⲡⲣ[.]ⲁ̣ⲃ.[ <text:line-break/><text:span text:style-name="T1"> </text:span><text:span text:style-name="T2">(138/2) </text:span> ⲕⲁⲧⲁ ⲑ̣ⲉ̣ ⲉⲧⲁⲓ̣̈ⲣ ϣⲣⲡ’̣ ⲛ ϫ̣ⲟ̣[ⲟ]ⲥ̣ [ⲛⲏ]‐ <text:line-break/><text:span text:style-name="T1"> </text:span><text:span text:style-name="T2">(138/3) </text:span> ⲧⲛ ϩⲟⲧⲁⲛ ⲉⲉⲓϩⲙ ⲡ[ⲥ]ⲱⲙⲁ· [ⲧ]ⲟⲧⲉ̣ <text:line-break/><text:span text:style-name="T1"> </text:span><text:span text:style-name="T2">(138/4) </text:span> ⲁⲥϣⲱⲡⲉ ⲛϭⲓ ⲟⲩⲉⲃⲣⲏϭⲉⲥ ⲙⲛ ⲟⲩ‐ <text:line-break/><text:span text:style-name="T1"> </text:span><text:span text:style-name="T2">(138/5) </text:span> ϩⲣⲟⲩ ⲙ ⲡⲉ ⲉⲃⲟⲗ ϩⲛ ⲧⲡⲉ· ⲁⲩⲱ ⲁⲩ‐ <text:line-break/><text:span text:style-name="T1"> </text:span><text:span text:style-name="T2">(138/6) </text:span> ⲧⲱⲣⲡ’ ⲙ ⲡⲉⲧⲁϥⲟⲩⲱⲛϩ ⲛⲁⲩ ⲉⲃⲟⲗ <text:line-break/><text:span text:style-name="T1"> </text:span><text:span text:style-name="T2">(138/7) </text:span> ⲙ ⲡⲓⲙⲁ ⲉⲧⲙⲙⲁⲩ ⲉϩⲣⲁⲓ̈ ⲉ ⲧⲡⲉ· ⲧⲟⲧⲉ <text:line-break/><text:span text:style-name="T1"> </text:span><text:span text:style-name="T2">(138/8) </text:span> ⲁⲛⲁⲡⲟⲥⲧⲟⲗⲟⲥ ⲁⲩϣⲡ’ ϩⲙⲟⲧ’ ⲛⲧⲙ <text:line-break/><text:span text:style-name="T1"> </text:span><text:span text:style-name="T2">(138/9) </text:span> ⲡϫⲟⲉⲓⲥ ϩⲣⲁⲓ̈ ϩⲛ ⲥⲙⲟⲩ ⲛⲓⲙ ⲁⲩ̣ⲱ <text:line-break/><text:span text:style-name="T1"> </text:span><text:span text:style-name="T2">(138/10) </text:span> ⲁⲩⲕⲟⲧⲟⲩ ⲉϩⲣⲁⲓ̈ ⲉ ⲑ̅ⲓ̅ⲏ̅ⲙ̣̅ ⲉ̣[ⲩ]ⲛ‐ <text:line-break/><text:span text:style-name="T1"> </text:span><text:span text:style-name="T2">(138/11) </text:span> ⲛⲏⲩ ⲇⲉ ⲉϩⲣⲁⲓ̈ ⲛⲁⲩϣⲁϫⲉ ⲙⲛ ⲛⲉ̣[ⲩ]‐ <text:line-break/><text:span text:style-name="T1"> </text:span><text:span text:style-name="T2">(138/12) </text:span> ⲉⲣⲏⲩ ϩⲓ ⲧⲉϩⲓⲏ· ⲉⲧⲃⲉ ⲡⲓⲟⲩⲟⲉⲓⲛ ⲉ̣‐ <text:line-break/><text:span text:style-name="T1"> </text:span><text:span text:style-name="T2">(138/13) </text:span> ⲧⲉⲁϥϣⲱⲡⲉ· ⲁⲩⲱ ⲁϥϣⲱⲡⲉ ⲛ‐ <text:line-break/><text:span text:style-name="T1"> </text:span><text:span text:style-name="T2">(138/14) </text:span> ϭⲓ ⲟⲩϣⲁϫⲉ ⲉⲧⲃⲉ ⲡϫⲟⲉⲓⲥ ⲉⲩϫⲱ̣ <text:line-break/><text:span text:style-name="T1"> </text:span><text:span text:style-name="T2">(138/15) </text:span> ⲙⲙⲟⲥ ϫⲉ ⲉϣϫⲉ ⲛⲧⲟϥ ⲡⲉⲛϫⲟ̣ⲉ̣[ⲓⲥ] <text:line-break/><text:span text:style-name="T1"> </text:span><text:span text:style-name="T2">(138/16) </text:span> ⲁϥϫⲓ ⲙⲕⲁϩ ϩⲓⲉ ⲁⲟⲩⲏⲣ ϭⲉ ⲁⲛⲟⲛ[·] <text:line-break/><text:span text:style-name="T1"> </text:span><text:span text:style-name="T2">(138/17) </text:span> ⲁϥⲟⲩⲱϣⲃ ⲛϭⲓ ⲡⲉⲧⲣⲟⲥ ⲉϥϫⲱ <text:line-break/><text:span text:style-name="T1"> </text:span><text:span text:style-name="T2">(138/18) </text:span> ⲙⲙⲟⲥ ϫⲉ ⲁϥϫⲓ ⲙⲕⲁϩ ⲉⲧⲃⲏⲏⲧ̣[ⲛ] <text:line-break/><text:span text:style-name="T1"> </text:span><text:span text:style-name="T2">(138/19) </text:span> ⲁⲩⲱ ϩⲁⲡⲥ ⲉⲣⲟⲛ ϩⲱⲱⲛ ⲉ ⲧⲣⲉ̣[ⲛ]‐ <text:line-break/><text:span text:style-name="T1"> </text:span><text:span text:style-name="T2">(138/20) </text:span> ϫⲓ ⲙⲕⲁϩ ⲉⲧⲃⲉ ⲧⲉⲛⲙⲛⲧ’ⲕⲟⲩ[ⲉⲓ] <text:line-break/><text:span text:style-name="T1"> </text:span><text:span text:style-name="T2">(138/21) </text:span> ⲧⲟⲧⲉ ⲁⲩⲥⲙⲏ ϣⲱⲡⲉ ϣⲁⲣⲟⲟⲩ <text:line-break/><text:span text:style-name="T1"> </text:span><text:span text:style-name="T2">(138/22) </text:span> ⲉⲥϫⲱ ⲙⲙⲟⲥ ϫⲉ ⲁⲓ̈ϫⲟⲥ ⲛⲏⲧⲛ <text:line-break/><text:span text:style-name="T1"> </text:span><text:span text:style-name="T2">(138/23) </text:span> ⲛ ϩⲁϩ ⲛ ⲥⲟⲡ’ ϫⲉ ϩⲁⲡⲥ ⲉⲣⲱⲧⲛ <text:line-break/><text:span text:style-name="T1"> </text:span><text:span text:style-name="T2">(138/24) </text:span> ⲉ ⲧⲣⲉⲧⲉⲧⲛϫⲓ ⲙⲕⲁϩ· ϩⲁ‐ <text:line-break/><text:span text:style-name="T1"> </text:span><text:span text:style-name="T2">(138/25) </text:span> ⲡⲥ ⲉ ⲧⲣⲉⲩⲛ ⲧⲏⲩⲧⲛ ⲉ ϩⲉⲛⲥⲉⲩ‐ <text:line-break/><text:span text:style-name="T1"> </text:span><text:span text:style-name="T2">(138/26) </text:span> ⲛⲁⲅⲱⲅⲏ ⲙⲛ ϩⲉⲛϩⲏⲅⲉⲙⲱⲛ <text:line-break/><text:span text:style-name="T1"> </text:span><text:span text:style-name="T2">(138/27) </text:span> ϩⲱⲥⲧⲉ ⲛⲧⲉⲧⲛϫⲓ ⲙⲕⲁϩ· ⲡⲏ ⲇⲉ <text:line-break/><text:span text:style-name="T1"> </text:span><text:span text:style-name="T2">(138/28) </text:span> ⲉⲧⲉ ⲛϥⲛⲁϫⲓ ⲙⲕⲁϩ ⲁⲛ ⲟⲩⲇⲉ <text:line-break/><text:span text:style-name="T1"> </text:span><text:span text:style-name="T2">(139/1) </text:span> [ <text:line-break/><text:span text:style-name="T1"> </text:span><text:span text:style-name="T2">(139/2) </text:span> [ ].[... <text:line-break/><text:span text:style-name="T1"> </text:span><text:span text:style-name="T2">(139/3) </text:span> [ ].[..]ⲓ̣̈ⲱⲧ’̣ <text:line-break/><text:span text:style-name="T1"> </text:span><text:span text:style-name="T2">(139/4) </text:span> [ ]. ϫⲉⲕⲁⲁⲥ ⲉ̣ϥ̣‐ <text:line-break/><text:span text:style-name="T1"> </text:span><text:span text:style-name="T2">(139/5) </text:span> [..].ⲣ.[......ⲁ]ⲛⲁⲡⲟⲥⲧⲟⲗⲟⲥ ⲇⲉ <text:line-break/><text:span text:style-name="T1"> </text:span><text:span text:style-name="T2">(139/6) </text:span> [ⲁⲩ]ⲣ̣ⲁϣ[ⲉ] ⲉ̣[ⲙⲁ]ⲧ̣ⲉ ⲁⲩⲱ ⲁⲩⲉⲓ ⲉϩⲣⲁⲓ̈ <text:line-break/><text:span text:style-name="T1"> </text:span><text:span text:style-name="T2">(139/7) </text:span> [ⲉ ⲑ̅ⲓ̅]ⲏ̅ⲙ ⲁⲩⲱ ⲁⲩ̣ⲉⲓ ⲉϩⲣⲁⲓ̈ ⲉ ⲡⲣⲡⲉ ⲁⲩϯ <text:line-break/><text:span text:style-name="T1"> </text:span><text:span text:style-name="T2">(139/8) </text:span> [ⲥⲃ]ⲱ ϩⲛ ⲟⲩⲟⲩϫⲁⲓ̈ ϩⲣⲁⲓ̈ ϩⲙ ⲡⲣⲁⲛ ⲛⲧⲉ <text:line-break/><text:soft-page-break/><text:span text:style-name="T1"> </text:span><text:span text:style-name="T2">(139/9) </text:span> [ⲡϫ]ⲟ̣ⲉⲓⲥ ⲓ̅ⲥ̅ ⲡⲉⲭ̅ⲥ̅· ⲁⲩⲱ ⲁⲩⲣ ⲡⲁϩⲣⲉ <text:line-break/><text:span text:style-name="T1"> </text:span><text:span text:style-name="T2">(139/10) </text:span> [ⲉ ⲡ]ⲙⲏⲏϣⲉ· ⲁϥⲟⲩⲱⲛ ⲇⲉ ⲉⲣⲱϥ ⲛϭⲓ <text:line-break/><text:span text:style-name="T1"> </text:span><text:span text:style-name="T2">(139/11) </text:span> [ⲡⲉ]ⲧ̣ⲣⲟⲥ ⲡ[ⲉ]ϫⲁϥ ⲛ ⲛⲉϥⲙⲁⲑⲏⲧⲏⲥ ϫⲉ <text:line-break/><text:span text:style-name="T1"> </text:span><text:span text:style-name="T2">(139/12) </text:span> [ⲉϩ]ⲉ ⲡⲉⲛϫⲟⲉⲓⲥ ⲓ̅ⲥ̅ ϩⲟⲧⲁⲛ ⲉϥϩⲛ ⲥⲱⲙⲁ <text:line-break/><text:span text:style-name="T1"> </text:span><text:span text:style-name="T2">(139/13) </text:span> [ⲁϥ]ϯ̣ ⲙⲁⲉⲓⲛ ⲛⲁⲛ ⲉ ϩⲱⲃ ⲛⲓⲙ ⲛⲧⲟϥ ⲅⲁⲣ <text:line-break/><text:span text:style-name="T1"> </text:span><text:span text:style-name="T2">(139/14) </text:span> [ⲁϥ]ⲉⲓ ⲉϩⲣⲁⲓ̈· ⲛⲁⲥⲛⲏⲩ ϫⲓ ⲥⲙⲏ ⲉ ⲧⲁⲥⲙⲏ <text:line-break/><text:span text:style-name="T1"> </text:span><text:span text:style-name="T2">(139/15) </text:span> [ⲁⲩ]ⲱ ⲁϥⲙⲟⲩϩ ⲉⲃⲟⲗ ϩⲛ ⲟⲩⲡ̅ⲛ̅ⲁ̅ ⲉϥⲟⲩⲁⲁⲃ <text:line-break/><text:span text:style-name="T1"> </text:span><text:span text:style-name="T2">(139/16) </text:span> [ⲡⲉ]ϫⲁϥ ⲛ ϯϩⲉ ϫⲉ ⲡⲉⲛⲫⲱⲥⲧⲏⲣ ⲓ̅ⲥ̅ <text:line-break/><text:span text:style-name="T1"> </text:span><text:span text:style-name="T2">(139/17) </text:span> [ⲁϥⲉⲓ] ⲉϩⲣⲁⲓ̈ ⲁⲩⲱ ⲁⲩⲁϣⲧϥ· ⲁⲩⲱ ⲁϥⲣ ⲫⲟ‐ <text:line-break/><text:span text:style-name="T1"> </text:span><text:span text:style-name="T2">(139/18) </text:span> [ⲣⲉⲓ ⲛ ⲟ]ⲩⲕⲗⲟⲙ ⲛ ϣⲟ〈ⲛ〉ⲧⲉ· ⲁⲩⲱ ⲁϥϯ ϩⲓ‐ <text:line-break/><text:span text:style-name="T1"> </text:span><text:span text:style-name="T2">(139/19) </text:span> [ⲱⲱϥ] ⲛⲛ ⲟⲩⲥⲧⲟⲗⲏ ⲛ ϫⲏϭⲉ ⲁⲩⲱ ⲁⲩ‐ <text:line-break/><text:span text:style-name="T1"> </text:span><text:span text:style-name="T2">(139/20) </text:span> [ⲁϣ]ⲧ̣ϥ ⲉϫⲛ ⲟⲩϣⲉ ⲁⲩⲱ ⲁⲩⲧⲟⲙⲥϥ ϩⲛ <text:line-break/><text:span text:style-name="T1"> </text:span><text:span text:style-name="T2">(139/21) </text:span> ⲟ̣[ⲩ]ⲙ̣ϩⲁⲟⲩ ⲁⲩⲱ ⲁϥⲧⲱⲛϥ ⲉⲃⲟⲗ ϩⲛ ⲛⲉⲧ’‐ <text:line-break/><text:span text:style-name="T1"> </text:span><text:span text:style-name="T2">(139/22) </text:span> ⲙ[ⲟⲟ]ⲩⲧ’·ʹ264ʹ264ʹ264 ⲛⲁⲥⲛⲏⲩ ⲟⲩϣⲙⲙⲟ ⲙ <text:line-break/><text:span text:style-name="T1"> </text:span><text:span text:style-name="T2">(139/23) </text:span> ⲡⲉⲓ̈ϫⲓ ⲙⲕⲁϩ ⲡⲉ ⲓ̅ⲥ̅· ⲁⲗⲗⲁ ⲁⲛⲟⲛ ⲡⲉⲧⲉ‐ <text:line-break/><text:span text:style-name="T1"> </text:span><text:span text:style-name="T2">(139/24) </text:span> ⲁⲛ̣ϫⲓ ⲙⲕⲁϩ ϩⲛ ⲧⲡⲁⲣⲁⲃⲁⲥⲓⲥ ⲛ ⲧⲙⲁⲁⲩ <text:line-break/><text:span text:style-name="T1"> </text:span><text:span text:style-name="T2">(139/25) </text:span> ⲁⲩⲱ ⲉⲧⲃⲉ ⲡⲁⲓ̈ ⲁϥⲉⲓⲣⲉ ⲛ ϩⲱⲃ ⲛⲓⲙ <text:line-break/><text:span text:style-name="T1"> </text:span><text:span text:style-name="T2">(139/26) </text:span> ⲕⲁⲧⲁ ⲟⲩⲉⲓⲛⲉ ϩⲣⲁⲓ̈ ⲛϩⲏⲧⲛ· ⲡϫⲟⲉⲓⲥ <text:line-break/><text:span text:style-name="T1"> </text:span><text:span text:style-name="T2">(139/27) </text:span> ⲅⲁⲣ ⲓ̅ⲥ̅ ⲡϣⲏⲣⲉ ⲛⲧⲉ ⲡⲉⲟⲟⲩ ⲙ ⲡⲓⲱⲧ’ <text:line-break/><text:span text:style-name="T1"> </text:span><text:span text:style-name="T2">(139/28) </text:span> ⲛ ⲁⲧ’ϯ ϣⲓ ⲉⲣⲟϥ ⲡⲁⲓ̈ ⲡⲉ ⲡⲓⲁⲣⲭⲏⲅⲟⲥ <text:line-break/><text:span text:style-name="T1"> </text:span><text:span text:style-name="T2">(139/29) </text:span> ⲛⲧⲉ ⲡⲉⲛⲱⲛϩ· ʹ264ʹ264 ⲛⲁⲥⲛⲏⲩ ⲙⲡⲣ‐ <text:line-break/><text:span text:style-name="T1"> </text:span><text:span text:style-name="T2">(139/30) </text:span> ⲧⲣⲉⲛⲥⲱⲧⲙ ⲟⲩⲛ ⲛⲥⲁ ⲛⲉⲓ̈ⲁⲛⲟ‐ <text:line-break/><text:span text:style-name="T1"> </text:span><text:span text:style-name="T2">(139/31) </text:span> ⲙⲟⲥ ⲁⲩⲱ ⲛⲧⲛⲙⲟⲟϣⲉ ϩⲣⲁⲓ̈ ϩⲛ <text:line-break/><text:span text:style-name="T1"> </text:span><text:span text:style-name="T2">(140/1) </text:span> [ ⲁⲡⲉ]‐ <text:line-break/><text:span text:style-name="T1"> </text:span><text:span text:style-name="T2">(140/2) </text:span> ⲧ̣ⲣⲟⲥ ⲁϥ̣[.]ⲱ.[ <text:line-break/><text:span text:style-name="T1"> </text:span><text:span text:style-name="T2">(140/3) </text:span> [.]ⲡⲉ ⲉϥϫⲱ ⲙ̣[ⲙⲟⲥ ϫⲉ ⲡⲉⲛϫⲟⲉ]ⲓ̣ⲥ̣ ⲓ̣̅[ⲥ̅] <text:line-break/><text:span text:style-name="T1"> </text:span><text:span text:style-name="T2">(140/4) </text:span> ⲡⲉⲭ̅ⲥ̅ ⲡⲁⲣⲭⲏⲅⲟⲥ̣ ⲛ[ⲧⲉ ⲡ]ⲓ̣ⲙⲧⲟ[ⲛ] <text:line-break/><text:span text:style-name="T1"> </text:span><text:span text:style-name="T2">(140/5) </text:span> ⲙⲁϯ ⲛⲁⲛ ⲛ ⲟⲩⲡ̅ⲛ̅ⲁ̅ ⲛ̣ⲧⲉ ⲟⲩⲉⲡⲓ̣[ⲥ]‐ <text:line-break/><text:span text:style-name="T1"> </text:span><text:span text:style-name="T2">(140/6) </text:span> ⲧⲏⲙⲏ ϩⲓⲛⲁ ⲁⲛⲟⲛ ϩⲱⲱⲛ ϫⲉ ⲉⲛⲉ̣‐ <text:line-break/><text:span text:style-name="T1"> </text:span><text:span text:style-name="T2">(140/7) </text:span> ⲉⲓⲣⲉ ⲛ ϩⲉⲛϭⲟⲙ· ⲧⲟⲧⲉ ⲁⲡⲉ̣ⲧ[ⲣⲟⲥ] <text:line-break/><text:span text:style-name="T1"> </text:span><text:span text:style-name="T2">(140/8) </text:span> ⲙⲛ ⲛⲓⲕⲉⲁⲡⲟⲥⲧⲟⲗⲟⲥ ⲁⲩⲛⲁⲩ ⲉ̣[. <text:line-break/><text:span text:style-name="T1"> </text:span><text:span text:style-name="T2">(140/9) </text:span> ⲁⲩⲱ ⲁⲩⲙⲟⲩϩ ⲉⲃⲟⲗ ϩ̣[ⲛ] ⲟ̣ⲩⲡ̅ⲛ̅[ⲁ̅] <text:line-break/><text:span text:style-name="T1"> </text:span><text:span text:style-name="T2">(140/10) </text:span> ⲉϥⲟⲩⲁⲁⲃ· ⲁⲩⲱ ⲁⲡⲟⲩⲁ ⲡⲟⲩⲁ̣ <text:line-break/><text:span text:style-name="T1"> </text:span><text:span text:style-name="T2">(140/11) </text:span> ⲉⲓⲣⲉ ⲛ ϩⲉⲛⲧⲁⲗϭⲟ· ⲁⲩⲱ ⲁⲩⲡⲱⲣϫ̣ <text:line-break/><text:span text:style-name="T1"> </text:span><text:span text:style-name="T2">(140/12) </text:span> ⲉⲃⲟⲗ ϫⲉ ⲉⲩⲉⲧⲁϣⲉ ⲟⲉⲓϣ ⲙ ⲡϫⲟ‐ <text:line-break/><text:span text:style-name="T1"> </text:span><text:span text:style-name="T2">(140/13) </text:span> ⲉⲓⲥ ⲓ̅ⲥ̅ ⲁⲩⲱ ⲁⲩⲥⲱⲟⲩϩ ϣⲁ ⲛⲉ[ⲩ]‐ <text:line-break/><text:span text:style-name="T1"> </text:span><text:span text:style-name="T2">(140/14) </text:span> ⲉⲣⲏⲩ ⲁⲩⲣ ⲁⲥⲡⲁⲍⲉ ⲙⲙⲟⲟⲩ [ⲉⲩ]‐ <text:line-break/><text:span text:style-name="T1"> </text:span><text:span text:style-name="T2">(140/15) </text:span> ϫⲱ ⲙⲙⲟⲥ ϫⲉ ϩⲁⲙⲏⲛ·ʹ264ʹ264 ⲧⲟ[ⲧⲉ] <text:line-break/><text:span text:style-name="T1"> </text:span><text:span text:style-name="T2">(140/16) </text:span> ⲁϥⲟⲩⲱⲛϩ ⲉⲃⲟⲗ ⲛϭⲓ ⲓ̅ⲥ̅ ⲉϥϫⲱ [ⲙ]‐ <text:line-break/><text:span text:style-name="T1"> </text:span><text:span text:style-name="T2">(140/17) </text:span> ⲙⲟⲥ ⲛⲁⲩ ϫⲉ ϯⲣⲏⲛⲏ ⲛⲏⲧⲛ [ⲧⲏⲣ]‐ <text:line-break/><text:span text:style-name="T1"> </text:span><text:span text:style-name="T2">(140/18) </text:span> ⲧⲛ ⲙⲛ ⲟⲩⲟⲛ ⲛⲓⲙ ⲉⲧⲛⲁϩⲧⲉ ⲉ̣ <text:line-break/><text:span text:style-name="T1"> </text:span><text:span text:style-name="T2">(140/19) </text:span> ⲡⲁⲣⲁⲛ· ⲉⲧⲉⲧⲛⲁⲃⲱⲕ ⲇⲉ ⲉϥⲉ̣‐ <text:line-break/><text:span text:style-name="T1"> </text:span><text:span text:style-name="T2">(140/20) </text:span> ϣⲱⲡⲉ ⲛⲏⲧⲛ ⲛϭⲓ ⲟⲩⲣⲁϣⲉ ⲙⲛ <text:line-break/><text:span text:style-name="T1"> </text:span><text:span text:style-name="T2">(140/21) </text:span> ⲟⲩϩⲙⲟⲧ’ ⲙⲛ ⲟⲩϭⲁⲙ· ⲙⲡⲣⲣ <text:line-break/><text:span text:style-name="T1"> </text:span><text:span text:style-name="T2">(140/22) </text:span> ϭⲁⲃϩⲏⲧ’ ⲇⲉ ⲉⲓⲥ ϩⲏⲧⲉ ϯⲛⲉⲙⲏⲧⲛ <text:line-break/><text:span text:style-name="T1"> </text:span><text:span text:style-name="T2">(140/23) </text:span> ϣⲁ ⲉⲛⲉϩ·ʹ264 ⲧⲟⲧⲉ ⲁⲛ〈ⲁ〉ⲡⲟ̣ⲥⲧⲟ‐ <text:line-break/><text:span text:style-name="T1"> </text:span><text:span text:style-name="T2">(140/24) </text:span> ⲗⲟⲥ ⲁⲩⲡⲱⲣϫ ⲙⲙⲟⲟⲩ ⲉⲃⲟⲗ <text:line-break/><text:soft-page-break/><text:span text:style-name="T1"> </text:span><text:span text:style-name="T2">(140/25) </text:span> ⲉϩⲣⲁⲓ̈ ⲉ ⲡⲓϥⲧⲟⲟⲩ ⲛ ϣⲁϫⲉ ϫⲉ ⲉⲩ‐ <text:line-break/><text:span text:style-name="T1"> </text:span><text:span text:style-name="T2">(140/26) </text:span> ⲉⲧⲁϣⲉ ⲟⲉⲓϣ ⲁⲩⲱ ⲁⲩⲃⲱⲕ <text:line-break/><text:span text:style-name="T1"> </text:span><text:span text:style-name="T2">(140/27) </text:span> ϩⲛ ⲟⲩϭⲟⲙ ⲛⲧⲉ ⲓ̅ⲥ̅ ϩⲛ ⲟⲩⲉⲓⲣⲏⲛ̣[ⲏ]·ʹ26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4:06:35.288875700</meta:creation-date>
    <meta:generator>LibreOffice/26.2.1.2$Windows_X86_64 LibreOffice_project/620$Build-2</meta:generator>
    <dc:date>2026-03-24T14:10:36.033835100</dc:date>
    <meta:editing-duration>PT4M</meta:editing-duration>
    <meta:editing-cycles>1</meta:editing-cycles>
    <meta:document-statistic meta:table-count="0" meta:image-count="0" meta:object-count="0" meta:page-count="75" meta:paragraph-count="4" meta:word-count="16931" meta:character-count="113579" meta:non-whitespace-character-count="86215"/>
  </office:meta>
</office:document-meta>
</file>