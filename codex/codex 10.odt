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style:font-name="Antinoou"/>
    </style:style>
    <style:style style:name="P2" style:family="paragraph" style:parent-style-name="Text_20_body">
      <style:text-properties style:font-name="Antinoou"/>
    </style:style>
    <style:style style:name="P3" style:family="paragraph" style:parent-style-name="Standard">
      <style:paragraph-properties fo:break-before="page"/>
      <style:text-properties style:font-name="Antinoou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fo:font-size="12pt" fo:font-weight="bol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 codex X ) Marsanes</text:p>
      <text:p text:style-name="P2"><text:span text:style-name="T1"> </text:span><text:span text:style-name="T2">(1/9) </text:span> (9 lines missing) <text:line-break/><text:span text:style-name="T1"> </text:span><text:span text:style-name="T2">(1/10) </text:span> [.]ⲓ̣ⲕ̣ⲟ̣[ <text:line-break/><text:span text:style-name="T1"> </text:span><text:span text:style-name="T2">(1/11) </text:span> ⲙⲛ̅ ⲟⲩⲃ̣[ⲉ]ⲕ̣[ⲉ] ⲁ̣ⲩⲥⲁⲩ[ⲛⲉ ⲁ]ⲩ‐ <text:line-break/><text:span text:style-name="T1"> </text:span><text:span text:style-name="T2">(1/12) </text:span> ϭⲛⲧϥ̅ ϩⲛ̅ ⲟⲩϩⲏⲧ ⲉϥⲧ̣[ⲟ]ⲩⲃⲏⲩ <text:line-break/><text:span text:style-name="T1"> </text:span><text:span text:style-name="T2">(1/13) </text:span> ⲉⲛⲥⲉϩⲁⲥⲓ ⲉⲛ ⲛ̅ⲧⲟⲟ̣[ⲧ]ϥ̅ <text:line-break/><text:span text:style-name="T1"> </text:span><text:span text:style-name="T2">(1/14) </text:span> ⲛ̅ϩⲙ̅ⲡⲉⲑ[ⲁ]ⲩ· ⲛⲉⲛ̣ⲧ̣ⲁ̣[ⲩ]ϫ̣ⲓ <text:line-break/><text:span text:style-name="T1"> </text:span><text:span text:style-name="T2">(1/15) </text:span> ⲧⲏⲛⲉ ⲥⲉⲛⲁϯ ⲛⲉⲩ ⲙ̅[ⲡ]ⲟⲩ <text:line-break/><text:span text:style-name="T1"> </text:span><text:span text:style-name="T2">(1/16) </text:span> ⲃ̣ⲉ̣ⲕⲉ ⲉϥⲥⲁⲧⲡ̅ ⲉⲧⲃ̣[ⲉ] ⲟⲩ‐ <text:line-break/><text:span text:style-name="T1"> </text:span><text:span text:style-name="T2">(1/17) </text:span> ϩⲩⲡⲟⲙⲟⲛⲏ ⲁⲩⲱ ϥ̣[ⲛ]ⲁ̣‐ <text:line-break/><text:span text:style-name="T1"> </text:span><text:span text:style-name="T2">(1/18) </text:span> ⲣ̅ⲁⲛⲉⲭⲉ ϩⲏⲧⲟⲩ ⲛ̅[ⲙ̅ⲡⲉ] <text:line-break/><text:span text:style-name="T1"> </text:span><text:span text:style-name="T2">(1/19) </text:span> ⲑⲁⲩ· ⲙⲛ̅ⲧⲣⲉⲗⲁⲁⲩ[ⲉ ⲇⲉ ⲛ̅]‐ <text:line-break/><text:span text:style-name="T1"> </text:span><text:span text:style-name="T2">(1/20) </text:span> ϩⲏⲧⲛ̅ ⲣ̅ⲗⲩⲡⲉⲓⲥⲑⲁ[ⲓ ⲁⲩ]ⲱ <text:line-break/><text:span text:style-name="T1"> </text:span><text:span text:style-name="T2">(1/21) </text:span> ⲙⲛ̅ⲧⲣⲉϥⲙⲉⲉⲩ[ⲉ ϩⲙ̅ ⲡ]ⲉϥ‐ <text:line-break/><text:span text:style-name="T1"> </text:span><text:span text:style-name="T2">(1/22) </text:span> ϩⲏⲧ ϫⲉ ϥⲣ̅ⲁⲡ̣[...].[ <text:line-break/><text:span text:style-name="T1"> </text:span><text:span text:style-name="T2">(1/23) </text:span> ⲛ̅ϭⲓ ⲡⲛⲁϭ ⲛ̣̅ⲉ̣[ⲓ]ⲱⲧ ϥ[ϭⲱ]‐ <text:line-break/><text:span text:style-name="T1"> </text:span><text:span text:style-name="T2">(1/24) </text:span> ϣⲧ̅ ⲅⲁⲣ ⲁϫⲙ̅ ⲡⲧⲏⲣϥ̣̅ [ⲁⲩⲱ] <text:line-break/><text:span text:style-name="T1"> </text:span><text:span text:style-name="T2">(1/25) </text:span> ϥ̅ϥⲓ ⲙ̅ⲡⲟⲩⲣⲁⲩϣ ⲧⲏ[ⲣⲟⲩ] <text:line-break/><text:span text:style-name="T1"> </text:span><text:span text:style-name="T2">(1/26) </text:span> ⲁⲩⲱ ⲁ[ϥⲟ]ⲩⲱⲛϩ̣ ⲛ̣[ⲁ]ⲩ <text:line-break/><text:span text:style-name="T1"> </text:span><text:span text:style-name="T2">(1/27) </text:span> ⲁⲃⲁⲗ [ⲙ̅]ⲡⲉϥⲕⲉⲗ̣[ <text:line-break/><text:span text:style-name="T1"> </text:span><text:span text:style-name="T2">(1/28) </text:span> ⲉⲛ[..] ⲛ̣ⲉ̣ⲧϫ̣ⲱ.[ <text:line-break/><text:span text:style-name="T1"> </text:span><text:span text:style-name="T2">(2/9) </text:span> (9 lines missing) <text:line-break/><text:span text:style-name="T1"> </text:span><text:span text:style-name="T2">(2/10) </text:span> [ +-13 ]..[ <text:line-break/><text:span text:style-name="T1"> </text:span><text:span text:style-name="T2">(2/11) </text:span> ⲛ[...]ⲛⲧⲁ[....]ⲩ ⲛ̅ϣⲁⲣ̣[ⲡ̅] <text:line-break/><text:span text:style-name="T1"> </text:span><text:span text:style-name="T2">(2/12) </text:span> ⲧⲙ[ⲁ]ϩⲙⲛ̅ⲧϣⲁⲙⲛ̅ⲧ ⲇⲉ ⲛ̅‐ <text:line-break/><text:span text:style-name="T1"> </text:span><text:span text:style-name="T2">(2/13) </text:span> ⲥⲫ̣ⲣⲁⲅⲓⲥ ⲁϩⲓⲕⲱⲉ ⲙ̅ⲙⲁ̣ⲥ̣ <text:line-break/><text:span text:style-name="T1"> </text:span><text:span text:style-name="T2">(2/14) </text:span> ⲁ[ⲡⲓ]ⲧ̣ⲛ̣̅ ⲙⲛ̅ [ⲡ]ⲧⲁϣ ⲛ̅ⲧ[ⲉ] <text:line-break/><text:span text:style-name="T1"> </text:span><text:span text:style-name="T2">(2/15) </text:span> ⲅ[ⲛ]ⲱ̣ⲥⲓⲥ ⲙⲛ̅ ⲡ̣ⲧⲁϫⲣⲟ ⲛ̅ⲧ̣[ⲁ] <text:line-break/><text:span text:style-name="T1"> </text:span><text:span text:style-name="T2">(2/16) </text:span> ⲛ[ⲁⲡ]ⲁⲩⲥⲓⲥ· ⲧϣⲁⲣⲡ ⲙⲉ̣[ⲛ] <text:line-break/><text:span text:style-name="T1"> </text:span><text:span text:style-name="T2">(2/17) </text:span> ⲙ̣[ⲛ̅ ⲧ]ⲙⲁϩⲥⲛ̅ⲧⲉ ⲙⲛ̅ ⲧⲙⲁ̣[ϩ]‐ <text:line-break/><text:span text:style-name="T1"> </text:span><text:span text:style-name="T2">(2/18) </text:span> [ϣⲁⲙ]ⲧⲉ ⲉⲩϣⲟⲟⲡ ⲛ̅ⲛ̅ⲕⲟⲥ‐ <text:line-break/><text:span text:style-name="T1"> </text:span><text:span text:style-name="T2">(2/19) </text:span> [ⲙⲓⲕⲟ]ⲥ̣ ⲙⲛ̅ ⲛ̅ϩⲩⲗⲓⲕⲟⲥ· ⲁϩⲓ‐ <text:line-break/><text:span text:style-name="T1"> </text:span><text:span text:style-name="T2">(2/20) </text:span> ⲧ̣[ⲁⲙ]ⲉ ⲧⲏⲛⲉ ⲁⲣⲁⲩ ⲁⲧⲣⲉⲧⲛ̅ <text:line-break/><text:span text:style-name="T1"> </text:span><text:span text:style-name="T2">(2/21) </text:span> ⲁ.[... ⲛ]ⲉⲧⲛ̅ⲥⲱⲙⲁ· ⲁⲩⲱ <text:line-break/><text:span text:style-name="T1"> </text:span><text:span text:style-name="T2">(2/22) </text:span> [ⲟⲩ]ⲇ̣[ⲩⲛⲁ]ⲙⲓⲥ ⲛ̅ⲁⲓⲥⲑⲏⲧⲏ <text:line-break/><text:span text:style-name="T1"> </text:span><text:span text:style-name="T2">(2/23) </text:span> [ⲥ]ⲛ̣ⲁ̣ϩ̣.[.] ⲛ̅ⲛⲉⲧⲁⲙ̅ⲧⲁⲛ ⲙ̣̅‐ <text:line-break/><text:span text:style-name="T1"> </text:span><text:span text:style-name="T2">(2/24) </text:span> [ⲙⲁ]ⲩ ⲁⲩⲱ ⲛ̅ⲥⲉⲣ̅ⲧⲏⲣⲓ ⲙ̅ⲙⲁⲩ <text:line-break/><text:span text:style-name="T1"> </text:span><text:span text:style-name="T2">(2/25) </text:span> [ⲁⲡ]ⲡⲁⲑⲟⲥ· ⲁⲩⲱ ⲡⲙⲉⲣⲓⲥⲙⲟⲥ <text:line-break/><text:span text:style-name="T1"> </text:span><text:span text:style-name="T2">(2/26) </text:span> [ⲙ̅ⲡ]ⲧ̣ⲱⲙⲉ· ⲧⲙ̣[ⲁ]ϩ̣ϥⲧⲟⲉ ⲇⲉ <text:line-break/><text:span text:style-name="T1"> </text:span><text:span text:style-name="T2">(2/27) </text:span> [ⲙⲛ̅ ⲧ]ⲙ̣ⲁϩϯⲉ ⲉ[ⲧ]ⲙ̅ ⲡⲥⲁϩⲣⲉ <text:line-break/><text:span text:style-name="T1"> </text:span><text:span text:style-name="T2">(2/28) </text:span> [ⲛⲉⲉⲓ] ⲁⲧⲉⲧⲛ̅ⲥ[ⲟ]ⲩⲱⲛⲟⲩ <text:line-break/><text:span text:style-name="T1"> </text:span><text:span text:style-name="T2">(2/29) </text:span> [.....]ⲟ̣.[..ⲛ̅ⲛⲟ]ⲩⲧⲉ <text:line-break/><text:span text:style-name="T1"> </text:span><text:span text:style-name="T2">(3/1) </text:span> ϥ̣ϣⲟⲟⲡ ⲙⲛ̅ⲛ̅ⲥⲁ ⲡ[ <text:line-break/><text:span text:style-name="T1"> </text:span><text:span text:style-name="T2">(3/2) </text:span> ⲁⲩⲱ ⲧⲫ[ⲩ]ⲥ̣ⲓⲥ ⲛ̅ⲛ̣.[ <text:line-break/><text:span text:style-name="T1"> </text:span><text:span text:style-name="T2">(3/3) </text:span> ⲉⲧⲉ ⲡⲉⲉⲓ [ⲡ]ⲉ ⲡⲉⲧⲡⲁ[ <text:line-break/><text:span text:style-name="T1"> </text:span><text:span text:style-name="T2">(3/4) </text:span> ⲉⲓ ⲛ̅ϣⲁⲙⲛ̅ⲧ ⲁ̣ⲩⲱ ⲁϩ[ⲓⲧⲁ] <text:line-break/><text:span text:style-name="T1"> </text:span><text:span text:style-name="T2">(3/5) </text:span> ⲙⲉ ⲧⲏⲛⲉ̣ ⲁⲛ̣[....]ⲱ[ <text:line-break/><text:span text:style-name="T1"> </text:span><text:span text:style-name="T2">(3/6) </text:span> ϩⲙ̅ ⲡϣⲁⲙⲛ̅[ⲧ <text:line-break/><text:soft-page-break/><text:span text:style-name="T1"> </text:span><text:span text:style-name="T2">(3/7) </text:span> ϩⲓⲧⲛ̅ ⲡⲉⲉⲓⲥⲛ̣[ⲉⲩ ⲁϩⲓⲧⲁ]‐ <text:line-break/><text:span text:style-name="T1"> </text:span><text:span text:style-name="T2">(3/8) </text:span> ⲙⲉ ⲧⲏⲛ̣ⲉ ⲁⲣ̣[ⲁϥ ϫⲉ ⲟⲩⲁ] <text:line-break/><text:span text:style-name="T1"> </text:span><text:span text:style-name="T2">(3/9) </text:span> ⲧⲥⲱⲙⲁ̣ ⲡⲉ̣ [ <text:line-break/><text:span text:style-name="T1"> </text:span><text:span text:style-name="T2">(3/10) </text:span> [..]ⲉ̣[ <text:line-break/><text:span text:style-name="T1"> </text:span><text:span text:style-name="T2">(3/11) </text:span> ⲁⲩⲱ ⲙⲛ̅ⲛ̣̅ⲥ[ⲁ <text:line-break/><text:span text:style-name="T1"> </text:span><text:span text:style-name="T2">(3/12) </text:span> [.]ⲟⲩ ⲛ̅ϩⲏⲧ[ <text:line-break/><text:span text:style-name="T1"> </text:span><text:span text:style-name="T2">(3/13) </text:span> ⲛⲓⲙ ⲉⲧ[ <text:line-break/><text:span text:style-name="T1"> </text:span><text:span text:style-name="T2">(3/14) </text:span> ⲛⲉⲧⲛ̅[....] ⲧ̣[ⲙⲁϩϯⲉ] <text:line-break/><text:span text:style-name="T1"> </text:span><text:span text:style-name="T2">(3/15) </text:span> ⲇⲉ ⲉ[ⲧⲃⲉ ⲧ]ⲙⲉⲧⲁⲛ[ⲟⲓⲁ ⲛ̅]‐ <text:line-break/><text:span text:style-name="T1"> </text:span><text:span text:style-name="T2">(3/16) </text:span> ⲛ̣ⲉⲧϣⲟⲟⲡ ⲛ̣̅ϩⲏⲧ ⲁ̣ⲩⲱ <text:line-break/><text:span text:style-name="T1"> </text:span><text:span text:style-name="T2">(3/17) </text:span> ⲉⲧⲃⲉ ⲛⲉⲧⲟⲩⲏϩ ⲙ̅ⲡ̣ⲙ̣ⲁ <text:line-break/><text:span text:style-name="T1"> </text:span><text:span text:style-name="T2">(3/18) </text:span> ⲉⲧⲙ̅ⲙⲉⲩ ⲧⲙⲁϩⲥⲟⲉ <text:line-break/><text:span text:style-name="T1"> </text:span><text:span text:style-name="T2">(3/19) </text:span> ⲇⲉ ⲉⲧⲃⲉ ⲛⲁⲩⲧⲟⲅⲉⲛ[ⲛⲏⲧ]ⲟ̣ⲥ̣ <text:line-break/><text:span text:style-name="T1"> </text:span><text:span text:style-name="T2">(3/20) </text:span> ⲉⲧⲃⲉ ⲧⲟⲩⲥⲓⲁ ⲛ̅ⲁⲥⲱⲙⲁ‐ <text:line-break/><text:span text:style-name="T1"> </text:span><text:span text:style-name="T2">(3/21) </text:span> ⲧⲟⲛ ⲉⲧϣⲟⲟⲡ ⲕⲁⲧⲁ̣ ⲙⲉ‐ <text:line-break/><text:span text:style-name="T1"> </text:span><text:span text:style-name="T2">(3/22) </text:span> ⲣⲟⲥ· ⲙⲛ̅ ⲛⲉⲧϣⲟ̣[ⲟⲡ] ϩⲛ̅ <text:line-break/><text:span text:style-name="T1"> </text:span><text:span text:style-name="T2">(3/23) </text:span> ⲧⲙⲏⲉ ⲙ̅ⲡⲧⲏⲣϥ̅ ⲁ[..]. <text:line-break/><text:span text:style-name="T1"> </text:span><text:span text:style-name="T2">(3/24) </text:span> ⲁⲟⲩⲉⲡⲓⲥⲧⲏⲙⲏ ⲙ[ⲛ̅ ⲟⲩ]‐ <text:line-break/><text:span text:style-name="T1"> </text:span><text:span text:style-name="T2">(3/25) </text:span> ⲱⲣϫ̅· ⲁⲩⲱ ⲧⲙⲁϩⲥⲁ[ϣϥⲉ] <text:line-break/><text:span text:style-name="T1"> </text:span><text:span text:style-name="T2">(3/26) </text:span> ⲉⲧⲃⲉ ⲧⲇⲩⲛⲁⲙⲓⲥ ⲛ̣̅[ⲁⲩⲧⲟ]‐ <text:line-break/><text:span text:style-name="T1"> </text:span><text:span text:style-name="T2">(3/27) </text:span> ⲅⲉⲛⲏⲥ· ⲉⲧⲉ ⲡⲉ̣[ⲉⲓ ⲡⲉ ⲡⲙⲁϩ]‐ <text:line-break/><text:span text:style-name="T1"> </text:span><text:span text:style-name="T2">(3/28) </text:span> ϣⲁ̣ⲙⲛ̅ⲧ ⲛ̅ⲧⲉⲗ̣[ⲉⲓⲟⲥ <text:line-break/><text:span text:style-name="T1"> </text:span><text:span text:style-name="T2">(3/29) </text:span> ⲡⲛ̣[..].ⲛ̣.ⲩ[ <text:line-break/><text:span text:style-name="T1"> </text:span><text:span text:style-name="T2">(4/1) </text:span> [ⲧⲙⲁϩ]ϥⲧⲟⲉ ⲉⲧⲃⲉ ⲡⲟⲩϫⲉ <text:line-break/><text:span text:style-name="T1"> </text:span><text:span text:style-name="T2">(4/2) </text:span> [ⲉⲓ· ⲙ]ⲛ̣̅ ⲧⲥⲟⲫ[ⲓ]ⲁ· ⲧⲙⲁϩϣⲙⲟⲩ <text:line-break/><text:span text:style-name="T1"> </text:span><text:span text:style-name="T2">(4/3) </text:span> [ⲛⲉ] ⲇ̣ⲉ ⲉⲧⲃⲉ ⲡⲛⲟⲩⲥ ⲉⲧⲟⲉⲓ <text:line-break/><text:span text:style-name="T1"> </text:span><text:span text:style-name="T2">(4/4) </text:span> [ⲛ̅]ϩ̣ⲁⲩⲧ [ⲛ̅ⲧⲁ]ϩⲟⲩⲱⲛϩ ⲁⲃⲁⲗ <text:line-break/><text:span text:style-name="T1"> </text:span><text:span text:style-name="T2">(4/5) </text:span> [ϫⲓ]ⲛ ⲛ̣̅[ϣⲁⲣⲡ̅] ⲙⲛ̅ ⲧⲟⲩⲥⲓⲁ ⲉ‐ <text:line-break/><text:span text:style-name="T1"> </text:span><text:span text:style-name="T2">(4/6) </text:span> [ⲧⲉ ⲙⲛ̅ⲧⲉⲥ ⲥ]ⲱ̣ⲙⲁ ⲙⲛ̅ ⲡⲕⲟⲥ‐ <text:line-break/><text:span text:style-name="T1"> </text:span><text:span text:style-name="T2">(4/7) </text:span> [ⲙⲟⲥ ⲛ̅ⲛⲟⲏ]ⲧⲟⲥ· ⲧⲙⲁϩⲯⲓⲧⲉ̣ <text:line-break/><text:span text:style-name="T1"> </text:span><text:span text:style-name="T2">(4/8) </text:span> [ 7+- ] ⲛ̅ⲧⲇ̣ⲩⲛⲁⲙⲓⲥ <text:line-break/><text:span text:style-name="T1"> </text:span><text:span text:style-name="T2">(4/9) </text:span> [ⲧⲉⲉⲓ ⲛ̅ⲧⲁϩⲟ]ⲩ̣ⲱ̣[ⲛ]ϩ̣ ⲁⲃⲁ[ⲗ] ϫ[ⲓⲛ] <text:line-break/><text:span text:style-name="T1"> </text:span><text:span text:style-name="T2">(4/10) </text:span> [ⲛ̅ϣⲁⲣⲡ̅· ⲧⲙⲁϩ]ⲙ̣ⲏⲧ̣ⲉ ⲉ̣ⲧ̣[ⲃⲉ] <text:line-break/><text:span text:style-name="T1"> </text:span><text:span text:style-name="T2">(4/11) </text:span> [ⲃⲁⲣⲃⲏⲗⲱ ⲧ]ⲡⲁⲣⲑⲉⲛⲟⲥ [ <text:line-break/><text:span text:style-name="T1"> </text:span><text:span text:style-name="T2">(4/12) </text:span> [ 7+- ⲛ̅]ⲧⲉ ⲡⲁⲓⲱ̣[ⲛ·] <text:line-break/><text:span text:style-name="T1"> </text:span><text:span text:style-name="T2">(4/13) </text:span> [ⲧⲙⲁϩⲙⲛ̅ⲧⲟⲩⲏⲉ] ⲙⲛ̅ ⲧⲙ̣ⲁ̣[ϩ]‐ <text:line-break/><text:span text:style-name="T1"> </text:span><text:span text:style-name="T2">(4/14) </text:span> [ⲙⲛ̅ⲧⲥ]ⲛⲁⲩ[ⲥ ⲉⲩ]ϣ̣ⲉϫⲉ ⲁⲡ‐ <text:line-break/><text:span text:style-name="T1"> </text:span><text:span text:style-name="T2">(4/15) </text:span> [ⲁϩⲟ]ⲣⲁⲧⲟⲥ ⲡ̣ⲉⲧ̣[ⲉ ⲟⲩ]ⲛⲧⲉϥ <text:line-break/><text:span text:style-name="T1"> </text:span><text:span text:style-name="T2">(4/16) </text:span> ϣ[ⲁ]ⲙⲛ̅ⲧⲧⲉ ⲛ̅ⲇⲩⲛ̣[ⲁ]ⲙⲓⲥ̣ [ⲙ̅]‐ <text:line-break/><text:span text:style-name="T1"> </text:span><text:span text:style-name="T2">(4/17) </text:span> ⲙ[ⲉ]ⲩ· ⲁⲩⲱ ⲡⲓⲡ̅ⲛ̅ⲁ̅ ⲉⲧⲉ ⲙⲛ̅‐ <text:line-break/><text:span text:style-name="T1"> </text:span><text:span text:style-name="T2">(4/18) </text:span> [ⲧ]ⲉ̣ϥ ⲟⲩⲥⲓⲁ ⲙ̅ⲙⲉⲩ ⲉϥⲏⲡ ⲁ‐ <text:line-break/><text:span text:style-name="T1"> </text:span><text:span text:style-name="T2">(4/19) </text:span> ⲧ̣ϣⲁⲣⲡ̅ ⲛ̅ⲁⲧⲟⲩϫⲡⲁⲥ· ⲧⲙⲁϩ‐ <text:line-break/><text:span text:style-name="T1"> </text:span><text:span text:style-name="T2">(4/20) </text:span> ⲙⲛ̅ⲧϣⲁⲙⲧⲉ ⲉ→ⲥ←ϣⲉϫⲉ ⲉⲧⲃⲉ <text:line-break/><text:span text:style-name="T1"> </text:span><text:span text:style-name="T2">(4/21) </text:span> ⲡⲉ[ⲧ]ⲕⲁⲣⲁⲉⲓⲧ ⲉⲙⲡⲟⲩⲥⲟⲩ‐ <text:line-break/><text:span text:style-name="T1"> </text:span><text:span text:style-name="T2">(4/22) </text:span> ⲱ̣[ⲱⲛ]ϥ̅· ⲁⲩⲱ ⲧⲕⲁⲧⲁⲣⲭⲏ ⲛ̅‐ <text:line-break/><text:span text:style-name="T1"> </text:span><text:span text:style-name="T2">(4/23) </text:span> [ⲡⲉⲧ]ⲉ ⲛⲡⲟⲩⲇⲓⲁⲕⲣⲓⲛⲉ ⲙ̅‐ <text:line-break/><text:span text:style-name="T1"> </text:span><text:span text:style-name="T2">(4/24) </text:span> [ⲙⲁϥ]· ⲁⲛⲁⲕ ⲅⲁⲣ ⲡⲉ ⲛ̅ⲧⲁϩⲓⲣ̅‐ <text:line-break/><text:soft-page-break/><text:span text:style-name="T1"> </text:span><text:span text:style-name="T2">(4/25) </text:span> [ⲛⲟⲉⲓ] ⲙ̅ⲡⲉⲧϣⲟⲟⲡ ⲙⲁⲙⲏ‐ <text:line-break/><text:span text:style-name="T1"> </text:span><text:span text:style-name="T2">(4/26) </text:span> [ⲉ ⲉⲓ]ⲧⲉ ⲕⲁⲧⲁ ⲙⲉⲣⲟⲥ ⲉⲓⲧⲉ ⲙ̅‐ <text:line-break/><text:span text:style-name="T1"> </text:span><text:span text:style-name="T2">(4/27) </text:span> [ⲡⲓⲡⲧⲏ]ⲣϥ̅ ⲕⲁⲧⲁ ⲧⲇⲓⲁⲫⲟⲣⲁ <text:line-break/><text:span text:style-name="T1"> </text:span><text:span text:style-name="T2">(4/28) </text:span> [ⲙⲛ 〈ⲡ〉ϣⲱϣ] ϫⲉ ⲥⲉϣⲟⲟⲡ ϫⲓⲛ ⲛ̅‐ <text:line-break/><text:span text:style-name="T1"> </text:span><text:span text:style-name="T2">(4/29) </text:span> [ϣⲁⲣⲡ̅ ϩⲙ̅ ⲡ]ⲙ̣ⲁ̣ ⲧⲏⲣ̣[ϥ̅] ⲉ̣ⲧⲟⲉ[ⲓ] <text:line-break/><text:span text:style-name="T1"> </text:span><text:span text:style-name="T2">(5/1) </text:span> ⲛ̅ⲁⲓⲱⲛⲓⲟⲛ 〈ⲛ̅ϭⲓ〉 ⲛⲉⲛⲧⲁϩϣⲱ‐ <text:line-break/><text:span text:style-name="T1"> </text:span><text:span text:style-name="T2">(5/2) </text:span> ⲡⲉ ⲧⲏⲣⲟⲩ· ⲉⲓⲧⲉ ⲭⲱⲣⲓⲥ ⲟⲩⲥⲓⲁ <text:line-break/><text:span text:style-name="T1"> </text:span><text:span text:style-name="T2">(5/3) </text:span> ⲉⲓⲧⲉ ϩⲛ̅ ⲟⲩⲥⲓⲁ· ⲛⲉⲧⲟⲉⲓ ⲛ̅ⲁⲧ‐ <text:line-break/><text:span text:style-name="T1"> </text:span><text:span text:style-name="T2">(5/4) </text:span> ϫⲡⲁⲩ· ⲁⲩⲱ ⲛⲁⲓⲱⲛ· ⲛ̅ⲛⲟⲩ <text:line-break/><text:span text:style-name="T1"> </text:span><text:span text:style-name="T2">(5/5) </text:span> ⲧⲉ ⲙⲛ̅ ⲛ̅ⲁⲅⲅ̣[ⲉ]ⲗⲟⲥ· ⲁⲩⲱ̣ <text:line-break/><text:span text:style-name="T1"> </text:span><text:span text:style-name="T2">(5/6) </text:span> ⲙ̅ⲯⲩⲭⲏ ⲉⲩϩ̣ⲛ̣̅ ⲟⲩⲙ[ⲛ̅ⲧ]‐ <text:line-break/><text:span text:style-name="T1"> </text:span><text:span text:style-name="T2">(5/7) </text:span> ⲃⲁⲗϩⲏⲧ· ⲁⲩⲱ ⲛ̣̅ϩ̣[ⲃ̅ⲥⲱ ⲙ̅]‐ <text:line-break/><text:span text:style-name="T1"> </text:span><text:span text:style-name="T2">(5/8) </text:span> ⲯⲩⲭⲏ· ⲛ̅ⲧⲁⲛⲧⲛ̅ ⲁ̣[ⲛϩⲁ]‐ <text:line-break/><text:span text:style-name="T1"> </text:span><text:span text:style-name="T2">(5/9) </text:span> ⲡⲗⲟⲩⲛ· ⲁⲩⲱ ⲙⲛ̅ⲛ̣̅[ⲥⲱⲥ ⲁ]‐ <text:line-break/><text:span text:style-name="T1"> </text:span><text:span text:style-name="T2">(5/10) </text:span> ϩⲟⲩⲧ̣ⲁⲧⲟⲩ ⲙ̣ⲛ̣̅ ⲛ̣[ <text:line-break/><text:span text:style-name="T1"> </text:span><text:span text:style-name="T2">(5/11) </text:span> ⲁⲣⲁⲩ· ⲉⲧⲓ ⲇⲉ [.....ⲧⲟⲩ]‐ <text:line-break/><text:span text:style-name="T1"> </text:span><text:span text:style-name="T2">(5/12) </text:span> ⲥⲓⲁ ⲧⲏⲣⲥ̅ ⲛ̣̅[.....ⲉⲧⲧⲛ̅]‐ <text:line-break/><text:span text:style-name="T1"> </text:span><text:span text:style-name="T2">(5/13) </text:span> ⲧⲱⲛ ⲁⲧⲟ̣[ⲩⲥⲓⲁ ⲛ̅ⲁⲧⲥⲱⲙⲁ] <text:line-break/><text:span text:style-name="T1"> </text:span><text:span text:style-name="T2">(5/14) </text:span> ⲙⲛ̅ ⲧⲁⲧⲟⲩ[ⲥⲓ]ⲁ· ⲗ̣[ⲟⲓⲡⲟⲛ] <text:line-break/><text:span text:style-name="T1"> </text:span><text:span text:style-name="T2">(5/15) </text:span> ⲇⲉ ⲁⲡϫⲱϩ̣ⲙ̅ ⲧⲏⲣ̣[ϥ̅ ⲟⲩϫⲉ] <text:line-break/><text:span text:style-name="T1"> </text:span><text:span text:style-name="T2">(5/16) </text:span> ⲉⲓ· ⲙⲛ̅ ⲧⲙⲛ̅ⲧⲁⲧⲙⲟⲩ ⲛ̅‐ <text:line-break/><text:span text:style-name="T1"> </text:span><text:span text:style-name="T2">(5/17) </text:span> ⲧⲉⲧⲙ̅ⲙⲉⲩ· ⲁϩⲓⲇⲓⲁⲕⲣⲓⲛⲉ· <text:line-break/><text:span text:style-name="T1"> </text:span><text:span text:style-name="T2">(5/18) </text:span> ⲁⲩⲱ ⲁϩⲓⲡⲱϩ ⲁⲑⲁⲏ ⲙ̅ⲡ̣ⲁ̣ⲓ‐ <text:line-break/><text:span text:style-name="T1"> </text:span><text:span text:style-name="T2">(5/19) </text:span> ⲥⲑⲏⲧⲟⲥ ⲕⲟⲥⲙⲟⲥ· 〈ⲁϩⲓⲥⲁⲩⲛⲉ〉 ⲕⲁⲧ[ⲁ] <text:line-break/><text:span text:style-name="T1"> </text:span><text:span text:style-name="T2">(5/20) </text:span> ⲙⲉⲣⲟⲥ ⲙ̅ⲡⲧⲟⲡⲟⲥ ⲧⲏⲣϥ̅ <text:line-break/><text:span text:style-name="T1"> </text:span><text:span text:style-name="T2">(5/21) </text:span> ⲛ̅ⲧⲟⲩⲥⲓⲁ ⲛ̅ⲁⲧⲥⲱⲙⲁ· ⲁⲩⲱ <text:line-break/><text:span text:style-name="T1"> </text:span><text:span text:style-name="T2">(5/22) </text:span> ⲡⲛⲟⲏⲧⲟⲥ ⲕⲟⲥⲙⲟⲥ ⲁ〈ϩⲓ〉‐ <text:line-break/><text:span text:style-name="T1"> </text:span><text:span text:style-name="T2">(5/23) </text:span> ⲥⲟⲩⲱⲛϥ̅ 〈ⲁϩⲓⲥⲁⲩⲛⲉ〉 ϩⲙ̅ ⲡⲧⲣ〈ⲁ〉ⲣ̅ⲇⲓ‐ <text:line-break/><text:span text:style-name="T1"> </text:span><text:span text:style-name="T2">(5/24) </text:span> ⲁⲕⲣⲓⲛⲉ· ϫⲉ ⲡⲁⲛⲧⲱⲥ ⲡⲓⲁ̣ⲓ‐ <text:line-break/><text:span text:style-name="T1"> </text:span><text:span text:style-name="T2">(5/25) </text:span> ⲥⲑⲏⲧⲟⲥ ⲕⲟⲥ̣ⲙⲟ̣ⲥ ϥⲙ̅[ⲡϣⲁ] <text:line-break/><text:span text:style-name="T1"> </text:span><text:span text:style-name="T2">(5/26) </text:span> ⲁⲧⲣⲉϥⲟⲩϫⲉⲉⲓ̣ [ⲧⲏ]ⲣϥ̅ [ϫⲉ] <text:line-break/><text:span text:style-name="T1"> </text:span><text:span text:style-name="T2">(5/27) </text:span> ⲙ̅ⲡⲓⲗⲟ ⲉⲉⲓϣⲉϫ[ⲉ ⲁⲡⲁⲩ]‐ <text:line-break/><text:span text:style-name="T1"> </text:span><text:span text:style-name="T2">(5/28) </text:span> ⲧⲟⲅ̣ⲉⲛⲏⲥ· ⲱ̣[ <text:line-break/><text:span text:style-name="T1"> </text:span><text:span text:style-name="T2">(5/29) </text:span> [.....]ϣ̣ⲱ̣ⲡ̣[ⲉ <text:line-break/><text:span text:style-name="T1"> </text:span><text:span text:style-name="T2">(6/1) </text:span> ⲕⲁⲧ[ⲁ] ⲙⲉⲣⲟⲥ ⲙ̅ⲡⲙⲁ ⲧⲏⲣϥ̣ <text:line-break/><text:span text:style-name="T1"> </text:span><text:span text:style-name="T2">(6/2) </text:span> ⲁϥⲓ ⲁⲡⲓⲧⲛ̅ ⲡⲁⲗⲓⲛ ⲁϥⲓ ⲁⲡⲓ‐ <text:line-break/><text:span text:style-name="T1"> </text:span><text:span text:style-name="T2">(6/3) </text:span> ⲧⲛ̅ 〈ⲁⲃⲁⲗ〉 ϩⲙ̅ ⲡⲉⲧⲉ ⲙ̅ⲡⲟⲩϫⲡⲁϥ <text:line-break/><text:span text:style-name="T1"> </text:span><text:span text:style-name="T2">(6/4) </text:span> ⲉⲙⲛ̅ⲧⲉϥ ⲟⲩⲥⲓⲁ ⲙ̅ⲙⲉⲩ ⲉ‐ <text:line-break/><text:span text:style-name="T1"> </text:span><text:span text:style-name="T2">(6/5) </text:span> ⲧⲉ̣ ⲡ̅ⲡ̅ⲛ̅ⲁ̣̅̅ [ⲡ]ⲉ· ⲡⲉⲉⲓ ⲉⲧϣⲟ‐ <text:line-break/><text:span text:style-name="T1"> </text:span><text:span text:style-name="T2">(6/6) </text:span> [ⲟⲡ ϩ]ⲁ̣ⲧⲟ̣ⲩϩ̣ⲏ ⲧⲏⲣⲟⲩ ⲉϥⲡⲏϩ <text:line-break/><text:span text:style-name="T1"> </text:span><text:span text:style-name="T2">(6/7) </text:span> [ⲁϫⲛ̅ ⲡⲁ]ⲩⲧⲟⲅⲉⲛⲛⲏⲧⲟⲥ ⲛ̅‐ <text:line-break/><text:span text:style-name="T1"> </text:span><text:span text:style-name="T2">(6/8) </text:span> [ⲛⲟⲩⲧ]ⲉ· ⲡⲉⲉⲓ ⲉⲩⲛ̅ⲧⲉϥ <text:line-break/><text:span text:style-name="T1"> </text:span><text:span text:style-name="T2">(6/9) </text:span> [ⲟⲩⲥⲓⲁ] ⲙ̅ⲙⲉⲩ ϥⲙⲟⲩϣ〈ⲧ〉 ⲙ̅‐ <text:line-break/><text:span text:style-name="T1"> </text:span><text:span text:style-name="T2">(6/10) </text:span> [......] ⲁ̣ⲩⲱ ϥϣⲟ̣ⲟ̣ⲡ̣ ⲙ̅‐ <text:line-break/><text:span text:style-name="T1"> </text:span><text:span text:style-name="T2">(6/11) </text:span> [......ⲁⲩ]ⲱ ⲉϥⲧⲛ̅ⲧⲁ̣ⲛ̣[ⲧ] <text:line-break/><text:span text:style-name="T1"> </text:span><text:span text:style-name="T2">(6/12) </text:span> [ 8+- ] ⲁ̣ⲩⲱ ⲁⲃⲁⲗ .[ <text:line-break/><text:span text:style-name="T1"> </text:span><text:span text:style-name="T2">(6/13) </text:span> [ 10+- ]ⲉⲩⲡⲱⲣϫ̅ <text:line-break/><text:soft-page-break/><text:span text:style-name="T1"> </text:span><text:span text:style-name="T2">(6/14) </text:span> [......]ⲱϩ̣[.]. ⲁϩⲓϣⲱ[ⲡⲉ] <text:line-break/><text:span text:style-name="T1"> </text:span><text:span text:style-name="T2">(6/15) </text:span> [....]. ⲛ̅ϩⲁϩ ⲁϥϭ̣ⲁⲗ̣ⲡ̅ ⲁⲃⲁ̣[ⲗ] <text:line-break/><text:span text:style-name="T1"> </text:span><text:span text:style-name="T2">(6/16) </text:span> ϫⲉ̣ ⲁϥⲧⲟⲩϫⲉ ⲟⲩⲙⲏϣ̣[ⲉ] <text:line-break/><text:span text:style-name="T1"> </text:span><text:span text:style-name="T2">(6/17) </text:span> ⲙⲛ̅ⲛ̅ⲥⲁ ⲛⲉⲉⲓ ⲇⲉ ⲧⲏⲣⲟⲩ <text:line-break/><text:span text:style-name="T1"> </text:span><text:span text:style-name="T2">(6/18) </text:span> ⲉⲓϣⲓⲛⲉ ⲛ̅ⲥⲁ ⲧⲙⲛ̅ⲧⲣ̅ⲣⲟ <text:line-break/><text:span text:style-name="T1"> </text:span><text:span text:style-name="T2">(6/19) </text:span> ⲙ̅ⲡⲁ ⲧϣⲁⲙⲧⲉ ⲙ̅ϭⲁⲙ ⲉⲙⲛ̅‐ <text:line-break/><text:span text:style-name="T1"> </text:span><text:span text:style-name="T2">(6/20) </text:span> ⲧⲉⲥ ϩⲟⲩⲉⲓⲧⲉ ⲙ̅ⲙⲉⲩ· ⲁⲃⲁⲗ <text:line-break/><text:span text:style-name="T1"> </text:span><text:span text:style-name="T2">(6/21) </text:span> ⲧⲟⲛ ⲁϥⲟⲩⲱⲛϩ ⲁⲃⲁⲗ ⲁⲩⲱ <text:line-break/><text:span text:style-name="T1"> </text:span><text:span text:style-name="T2">(6/22) </text:span> ⲁϥⲣ̅ⲉⲛⲉⲣⲅⲉⲓ· ⲁⲙⲟⲩϩ ⲙ̅‐ <text:line-break/><text:span text:style-name="T1"> </text:span><text:span text:style-name="T2">(6/23) </text:span> ⲡⲙⲁ ⲧⲏⲣϥ̅ ϩⲛ̅ ⲧⲉϥϭⲁⲙ· ⲁⲩⲱ <text:line-break/><text:span text:style-name="T1"> </text:span><text:span text:style-name="T2">(6/24) </text:span> ⲉϣ ⲧⲉ ⲑⲉ ⲛⲁⲧⲟⲩϫⲡⲁⲩ ⲁϩⲟⲩ‐ <text:line-break/><text:span text:style-name="T1"> </text:span><text:span text:style-name="T2">(6/25) </text:span> [ϣ]ⲱⲡⲉ ⲉⲛⲡⲟⲩϫⲡⲁⲩ· ⲁⲩⲱ <text:line-break/><text:span text:style-name="T1"> </text:span><text:span text:style-name="T2">(6/26) </text:span> [ⲉ]ϣ̣ ⲛⲉ̣ [ⲛ̅]ⲇ̣ⲓⲁⲫⲟⲣⲁ ⲛ̅ⲛⲁⲓ‐ <text:line-break/><text:span text:style-name="T1"> </text:span><text:span text:style-name="T2">(6/27) </text:span> [ⲱⲛ· ⲁⲩ]ⲱ ⲛⲉⲧⲉ ⲙ̅ⲡⲟⲩϫⲡⲁⲩ <text:line-break/><text:span text:style-name="T1"> </text:span><text:span text:style-name="T2">(6/28) </text:span> [ⲉⲩϣⲟⲟⲡ] ⲛ̅ⲟⲩⲏⲣ· ⲁⲩⲱ ϩⲛ̅ ⲉⲩ‐ <text:line-break/><text:span text:style-name="T1"> </text:span><text:span text:style-name="T2">(6/29) </text:span> [ⲉⲩϣⲃ̅ⲃⲉⲓⲁ]ⲉ̣ⲓⲧ ⲁⲛⲟⲩⲉⲣⲏ̣ⲩ <text:line-break/><text:span text:style-name="T1"> </text:span><text:span text:style-name="T2">(7/1) </text:span> ⲛ̅ⲧⲁⲣⲓϩⲁⲧⲧϩⲧ ⲥⲁ ⲛⲉⲉⲓ ⲁ‐ <text:line-break/><text:span text:style-name="T1"> </text:span><text:span text:style-name="T2">(7/2) </text:span> ϩⲓⲙ̅ⲙⲉ ϫⲉ ⲛ̅ⲧⲁϥⲣ̅ⲉⲛⲉⲣⲅⲓ̣ <text:line-break/><text:span text:style-name="T1"> </text:span><text:span text:style-name="T2">(7/3) </text:span> ⲁⲃⲁⲗ ϩⲛ̅ ⲟⲩⲕⲁⲣⲱϥ· ϥϣⲟⲟ[ⲡ] <text:line-break/><text:span text:style-name="T1"> </text:span><text:span text:style-name="T2">(7/4) </text:span> ϫⲓⲛ ⲛ̅ϣⲁⲣⲡ̅’ ⲛ̅ⲛⲉⲧϣⲟⲟⲡ <text:line-break/><text:span text:style-name="T1"> </text:span><text:span text:style-name="T2">(7/5) </text:span> ⲙⲁⲙⲏⲉ ⲉⲧ̣ⲏ̣ⲡ̣ ⲁⲡⲉⲧϣⲟ‐ <text:line-break/><text:span text:style-name="T1"> </text:span><text:span text:style-name="T2">(7/6) </text:span> ⲟⲡ· ⲕⲉⲟⲩⲉⲉ̣[ⲓ̣] ⲡⲉ ⲉϥϣⲟⲟ[ⲡ] <text:line-break/><text:span text:style-name="T1"> </text:span><text:span text:style-name="T2">(7/7) </text:span> ϫⲓⲛ ⲛ̅ϣⲁⲣⲡ̅ ⲉϥⲏⲡ ⲁ[ⲡ]ⲉⲧⲣ̣̅‐ <text:line-break/><text:span text:style-name="T1"> </text:span><text:span text:style-name="T2">(7/8) </text:span> ⲉⲛⲉⲣⲅⲉⲓ· ⲙ̅ⲡⲉⲧⲕ̣[ⲁⲣⲁ]ⲉⲓⲧ̣ <text:line-break/><text:span text:style-name="T1"> </text:span><text:span text:style-name="T2">(7/9) </text:span> ⲁⲩⲱ ⲡⲕⲁⲣⲱϥ ⲙ̣̅[ <text:line-break/><text:span text:style-name="T1"> </text:span><text:span text:style-name="T2">(7/10) </text:span> ⲛ̅ⲥⲱϥ ϥⲣ̅ⲉⲛⲉⲣⲅ̣[ⲉⲓ· ϩⲟ] <text:line-break/><text:span text:style-name="T1"> </text:span><text:span text:style-name="T2">(7/11) </text:span> ⲥⲟⲛ ⲅⲁⲣ ⲡⲉⲉ̣ⲓ̣ .[ <text:line-break/><text:span text:style-name="T1"> </text:span><text:span text:style-name="T2">(7/12) </text:span> ⲡⲏ ⲣ̅ⲉ[ⲛⲉⲣⲅⲉⲓ ⲁⲃⲁⲗ ϩⲙ̅] <text:line-break/><text:span text:style-name="T1"> </text:span><text:span text:style-name="T2">(7/13) </text:span> ⲡⲕⲁⲣ[ⲱϥ ⲉⲧⲏⲡ ⲁⲡⲁⲧⲟⲩ] <text:line-break/><text:span text:style-name="T1"> </text:span><text:span text:style-name="T2">(7/14) </text:span> ϫⲡⲁϥ ϩⲛ̣̅ [ⲛⲁ]ⲓ̣ⲱ[ⲛ ⲁⲩⲱ ϫⲓⲛ] <text:line-break/><text:span text:style-name="T1"> </text:span><text:span text:style-name="T2">(7/15) </text:span> ⲛ̅ϣⲁⲣⲡ̅ ⲙⲛ̅ⲧⲉϥ ⲟ̣[ⲩⲥⲓⲁ] <text:line-break/><text:span text:style-name="T1"> </text:span><text:span text:style-name="T2">(7/16) </text:span> ⲙ̅ⲙⲉⲩ· ⲧⲉⲛⲉⲣⲅⲉⲓⲁ ⲇ̣ⲉ ⲙ̅‐ <text:line-break/><text:span text:style-name="T1"> </text:span><text:span text:style-name="T2">(7/17) </text:span> ⲡⲏ 〈ⲡⲉ〉 ⲡⲁ ⲧϣⲁⲙⲛ̅ⲧⲉ ⲛ̅ⲇ̣ⲩⲛ[ⲁ]‐ <text:line-break/><text:span text:style-name="T1"> </text:span><text:span text:style-name="T2">(7/18) </text:span> ⲙⲓⲥ ⲡⲁⲧⲟⲩϫⲡⲁϥ ϩⲁⲧⲉ̣[ϩⲏ] <text:line-break/><text:span text:style-name="T1"> </text:span><text:span text:style-name="T2">(7/19) </text:span> ⲙ̅ⲡⲁⲓⲱⲛ· ⲉⲙⲛ̅ⲧⲉϥ ⲟⲩ̣[ⲥⲓⲁ] <text:line-break/><text:span text:style-name="T1"> </text:span><text:span text:style-name="T2">(7/20) </text:span> ⲙ̅ⲙⲉⲩ· ⲡϫⲓⲥⲉ ⲇⲉ ⲙ̅ⲡⲕⲁ‐ <text:line-break/><text:span text:style-name="T1"> </text:span><text:span text:style-name="T2">(7/21) </text:span> ⲣⲱϥ ⲙ̅ⲡⲉⲧⲕⲁⲣⲁⲉⲓⲧ· ⲟⲩⲛ <text:line-break/><text:span text:style-name="T1"> </text:span><text:span text:style-name="T2">(7/22) </text:span> ϭⲁⲙ ⲁⲛⲉⲩ ⲁⲣⲁϥ· ⲛ̅ϭⲓ ⲡϫⲓ‐ <text:line-break/><text:span text:style-name="T1"> </text:span><text:span text:style-name="T2">(7/23) </text:span> ⲥⲉ ⲛ̅ⲧⲉⲛⲉⲣⲅⲉⲓⲁ ⲙ̅ⲡⲁ ⲧϣⲁ‐ <text:line-break/><text:span text:style-name="T1"> </text:span><text:span text:style-name="T2">(7/24) </text:span> ⲙⲛ̅ⲧⲧⲉ ⲛ̅ϭⲁⲙ· ⲁⲩⲱ ⲡⲉ‐ <text:line-break/><text:span text:style-name="T1"> </text:span><text:span text:style-name="T2">(7/25) </text:span> ⲧϣⲟⲟⲡ ⲉⲧⲕ̣ⲁ̣ⲣ̣ⲁ̣ⲉⲓⲧ [ⲉⲧⲙ̅]‐ <text:line-break/><text:span text:style-name="T1"> </text:span><text:span text:style-name="T2">(7/26) </text:span> ⲡⲥⲁϩⲣⲉ ⲛ̅ⲧⲡ̣[ⲉ <text:line-break/><text:span text:style-name="T1"> </text:span><text:span text:style-name="T2">(7/27) </text:span> ⲁϥⲟⲩⲱⲛϩ ⲁⲃ̣[ⲁⲗ ⲙ̅ⲡⲁ ⲧϣⲁ]‐ <text:line-break/><text:span text:style-name="T1"> </text:span><text:span text:style-name="T2">(7/28) </text:span> ⲙⲛ̅ⲧⲉ ⲛ̅ϭ̣[ⲁⲙ ⲡϣⲁⲣⲡ̅ ⲛ̅ⲧⲉ]‐ <text:line-break/><text:span text:style-name="T1"> </text:span><text:span text:style-name="T2">(7/29) </text:span> ⲗⲉⲓⲟⲥ· ⲛ̅ⲧⲁ̣[ⲣⲉϥ <text:line-break/><text:span text:style-name="T1"> </text:span><text:span text:style-name="T2">(8/1) </text:span> ⲁⲛⲇⲩⲛⲁⲙⲓⲥ ⲁⲩⲧⲉⲗⲏⲗ <text:line-break/><text:span text:style-name="T1"> </text:span><text:span text:style-name="T2">(8/2) </text:span> ⲁϩⲟⲩϫⲱⲕ ⲁⲃⲁⲗ· 〈ⲛ̅ϭⲓ〉 ⲛⲉⲧϣⲟⲟⲡ <text:line-break/><text:soft-page-break/><text:span text:style-name="T1"> </text:span><text:span text:style-name="T2">(8/3) </text:span> ⲛ̅ϩⲣⲏⲓ̈ ⲛ̅ϩⲏⲧ ⲙⲛ̅ ⲡⲕⲉⲥⲉⲉ <text:line-break/><text:span text:style-name="T1"> </text:span><text:span text:style-name="T2">(8/4) </text:span> ⲡⲉ ⲧⲏⲣϥ̅· ⲁⲩⲱ ⲁϩⲟⲩⲥⲙⲟⲩ <text:line-break/><text:span text:style-name="T1"> </text:span><text:span text:style-name="T2">(8/5) </text:span> ⲧⲏⲣⲟⲩ ⲁⲡ̣[ⲁ] ⲧϣⲁⲙⲧⲉ ⲛ̅ϭⲁⲙ <text:line-break/><text:span text:style-name="T1"> </text:span><text:span text:style-name="T2">(8/6) </text:span> ⲛ̅ⲟⲩⲉⲉⲓ ⲟⲩⲉⲉⲓ· ⲉⲧⲉ ⲡⲉⲉⲓ <text:line-break/><text:span text:style-name="T1"> </text:span><text:span text:style-name="T2">(8/7) </text:span> ⲡⲉ [ⲡ]ϣⲁⲣⲡ̅ ⲛ̅ⲧⲉⲗⲉⲓⲟⲥ· ⲉⲩ‐ <text:line-break/><text:span text:style-name="T1"> </text:span><text:span text:style-name="T2">(8/8) </text:span> [ⲥⲙⲟⲩ ⲁⲣ]ⲁϥ ϩⲛ̅ ⲟⲩⲧⲟⲩⲃⲟ· ⲡⲙⲁ <text:line-break/><text:span text:style-name="T1"> </text:span><text:span text:style-name="T2">(8/9) </text:span> [ⲧⲏⲣϥ̅] ⲉ̣ⲩⲥⲙⲟⲩ ⲁⲡϫⲁⲉⲓⲥ ⲡ[ⲏ] <text:line-break/><text:span text:style-name="T1"> </text:span><text:span text:style-name="T2">(8/10) </text:span> [ⲉⲧϣⲟⲟⲡ] ϩ̣ⲁⲧⲉϩⲏ ⲙ̅ⲡⲧⲏⲣϥ̅ <text:line-break/><text:span text:style-name="T1"> </text:span><text:span text:style-name="T2">(8/11) </text:span> [...ⲡⲁ ⲧ]ϣ̣ⲁ̣ⲙⲧⲉ ⲛ̅ϭⲁⲙ· ⲙ <text:line-break/><text:span text:style-name="T1"> </text:span><text:span text:style-name="T2">(8/12) </text:span> [ 11+- ]ⲛⲟⲩϣⲙ̣̅‐ <text:line-break/><text:span text:style-name="T1"> </text:span><text:span text:style-name="T2">(8/13) </text:span> [ϣⲉ 10+- ] ϩ̣ⲱⲱⲧ <text:line-break/><text:span text:style-name="T1"> </text:span><text:span text:style-name="T2">(8/14) </text:span> [ⲁⲩⲱ ϯⲛⲁⲟⲩ]ⲱ̣ϩ [ⲁⲛ] ⲁ̣ⲧⲟⲟⲧ <text:line-break/><text:span text:style-name="T1"> </text:span><text:span text:style-name="T2">(8/15) </text:span> [ⲉⲉⲓϣⲓ]ⲛⲉ ϫⲉ ⲡⲱ̣ⲥ̣ ⲁϩ̣ⲟ̣ⲩⲕⲁ‐ <text:line-break/><text:span text:style-name="T1"> </text:span><text:span text:style-name="T2">(8/16) </text:span> ⲣⲱⲟⲩ· ϯⲛⲁⲣ̅ⲛⲟⲉⲓ ⲛ̅ⲟⲩⲇⲩ‐ <text:line-break/><text:span text:style-name="T1"> </text:span><text:span text:style-name="T2">(8/17) </text:span> ⲛ̣ⲁⲙⲓⲥ ⲉⲩⲛ̅ⲧⲏⲉⲓⲥ ⲙ̅ⲙⲉ̣[ⲩ] <text:line-break/><text:span text:style-name="T1"> </text:span><text:span text:style-name="T2">(8/18) </text:span> [ϩⲛ̅] ⲟⲩⲧⲁⲉⲓⲟ· ⲧⲙⲁϩϣⲁⲙⲧⲉ <text:line-break/><text:span text:style-name="T1"> </text:span><text:span text:style-name="T2">(8/19) </text:span> [ⲛ̅]ϭⲁⲙ ⲛ̅ⲧⲉ ⲡⲁ ⲧϣⲁⲙⲧⲉ ⲛ̅‐ <text:line-break/><text:span text:style-name="T1"> </text:span><text:span text:style-name="T2">(8/20) </text:span> ϭⲁⲙ· ⲉⲁⲥⲣ̅ⲛⲟⲉⲓ ⲙ̅ⲙ̅ⲁϥ· {ⲁⲩⲱ} <text:line-break/><text:span text:style-name="T1"> </text:span><text:span text:style-name="T2">(8/21) </text:span> ⲡⲁϫⲉⲥ ⲛⲏⲉⲓ ϫⲉ ⲕⲁⲣⲱⲕ· <text:line-break/><text:span text:style-name="T1"> </text:span><text:span text:style-name="T2">(8/22) </text:span> ϣⲓⲛⲁ ϫⲉ ⲛⲉⲕⲙ̅ⲙⲉ ⲛ̅ⲕⲡⲱⲧ <text:line-break/><text:span text:style-name="T1"> </text:span><text:span text:style-name="T2">(8/23) </text:span> ⲛ̅ⲕⲉ̣ⲓ̣ ⲁϩⲣⲏⲓ̈ ϣⲁⲣⲁⲉⲓ· ⲁⲗⲗⲁ <text:line-break/><text:span text:style-name="T1"> </text:span><text:span text:style-name="T2">(8/24) </text:span> ⲉⲣ̣ⲓⲛⲟⲉⲓ ⲙ̅ⲡⲉⲉⲓ ϫⲉ ⲛⲉϥⲕⲁ‐ <text:line-break/><text:span text:style-name="T1"> </text:span><text:span text:style-name="T2">(8/25) </text:span> [ⲣⲁⲉ]ⲓ̣ⲧ· ⲛ̅ⲕϥⲓ ⲙ̅ⲡⲛⲟⲏⲙⲁ· <text:line-break/><text:span text:style-name="T1"> </text:span><text:span text:style-name="T2">(8/26) </text:span> [ⲧⲇⲩⲛⲁⲙⲓⲥ ⲅ]ⲁⲣ ⲥⲙⲏⲛ ⲁⲃⲁⲗ <text:line-break/><text:span text:style-name="T1"> </text:span><text:span text:style-name="T2">(8/27) </text:span> [ⲁⲣⲁⲓ ⲉⲥϫⲓ ⲙ]ⲁ̣ⲉⲓⲧ ϩⲏⲧ· ⲁϩⲟ[ⲩⲛ] <text:line-break/><text:span text:style-name="T1"> </text:span><text:span text:style-name="T2">(8/28) </text:span> [ⲁⲡⲁⲓⲱⲛ ⲉⲧⲉ ⲃ]ⲁⲣⲃⲏⲗⲱ ⲧⲉ̣ <text:line-break/><text:span text:style-name="T1"> </text:span><text:span text:style-name="T2">(8/29) </text:span> [ⲧⲡⲁⲣⲑⲉⲛⲟⲥ] ⲛ̣̅ϩⲁⲩⲧ· <text:line-break/><text:span text:style-name="T1"> </text:span><text:span text:style-name="T2">(9/1) </text:span> ⲉⲧⲃⲉ ⲡⲉⲉⲓ ⲁⲥϣⲱⲡⲉ ⲛ̅‐ <text:line-break/><text:span text:style-name="T1"> </text:span><text:span text:style-name="T2">(9/2) </text:span> ϩⲁⲩⲧ· ⲛ̅ϭⲓ ⲧⲡⲁⲣⲑⲉⲛⲟⲥ· <text:line-break/><text:span text:style-name="T1"> </text:span><text:span text:style-name="T2">(9/3) </text:span> ϫⲉ ⲁⲥⲡⲱⲣϫ̅ ⲁⲫⲁⲩⲧ ⲁⲥⲱϩⲉ̣ <text:line-break/><text:span text:style-name="T1"> </text:span><text:span text:style-name="T2">(9/4) </text:span> ⲁ̣ⲣⲉⲧ→ⲥ̅← ⲙ̅ⲡⲉϥⲃⲁⲗ ⲛ̅ϭⲓ ⲧⲉ̣‐ <text:line-break/><text:span text:style-name="T1"> </text:span><text:span text:style-name="T2">(9/5) </text:span> ⲅ̣ⲛⲱⲥⲓⲥ· ϩⲱⲥ ⲉⲥⲏⲡ ⲁⲣⲁϥ̣ <text:line-break/><text:span text:style-name="T1"> </text:span><text:span text:style-name="T2">(9/6) </text:span> ⲧⲉⲧϣⲟⲟⲡ ⲇⲉ ⲧⲉⲛⲧⲁϩϣ[ⲓ] <text:line-break/><text:span text:style-name="T1"> </text:span><text:span text:style-name="T2">(9/7) </text:span> ⲛⲉ ⲟⲩ〈ⲛ〉ⲧⲉⲥ ⲙ̅ⲙⲉⲩ ⲛ̅ⲑⲉ ⲉ‐ <text:line-break/><text:span text:style-name="T1"> </text:span><text:span text:style-name="T2">(9/8) </text:span> ⲟⲩⲛⲧⲉϥ ⲙ̅ⲙⲉⲩ ⲛ̅ϭⲓ ⲡⲁ̣ [ⲧϣⲁⲙ]‐ <text:line-break/><text:span text:style-name="T1"> </text:span><text:span text:style-name="T2">(9/9) </text:span> ⲧⲉ ⲛ̅ϭⲁⲙ· ⲁⲥⲣ̅ⲁⲛⲁⲭⲱ̣[ⲣⲉⲓ] <text:line-break/><text:span text:style-name="T1"> </text:span><text:span text:style-name="T2">(9/10) </text:span> ⲛ̅ⲧⲟⲟⲧⲟⲩ ⲛ̅ⲧⲉⲉ̣[ⲓϭⲁⲙ] <text:line-break/><text:span text:style-name="T1"> </text:span><text:span text:style-name="T2">(9/11) </text:span> ⲥⲛ̅ⲧⲉ· ⲉⲥϣⲟⲟ̣ⲡ̣ [ⲙ̅ⲡⲃⲁⲗ] <text:line-break/><text:span text:style-name="T1"> </text:span><text:span text:style-name="T2">(9/12) </text:span> [ⲙ̅]ⲡ̣ⲓⲛⲁϭ ⲉⲥⲛ̣[ 7+- ⲉ]‐ <text:line-break/><text:span text:style-name="T1"> </text:span><text:span text:style-name="T2">(9/13) </text:span> ⲧⲙ̅ⲡⲥⲁϩⲣⲉ ⲛ̣̅[ <text:line-break/><text:span text:style-name="T1"> </text:span><text:span text:style-name="T2">(9/14) </text:span> ⲟⲥ ⲉⲧⲕⲁⲣⲁⲉⲓ̣[ⲧ ⲉⲩⲛ̅ⲧⲉϥ] <text:line-break/><text:span text:style-name="T1"> </text:span><text:span text:style-name="T2">(9/15) </text:span> ⲙ̅ⲙⲉⲩ ⲛ̅ⲧⲉⲉ[ⲓ]ⲉⲛ[ⲧⲟⲗⲏ] <text:line-break/><text:span text:style-name="T1"> </text:span><text:span text:style-name="T2">(9/16) </text:span> [ⲁ]ⲧⲣⲉϥⲕⲁⲣⲱϥ· ⲧⲉϥ[ⲅ]ⲛ̣ⲱ̣‐ <text:line-break/><text:span text:style-name="T1"> </text:span><text:span text:style-name="T2">(9/17) </text:span> [ⲥ]ⲓ̣ⲥ ⲙⲛⲗ̅ ⲧⲉϥϩⲩⲡⲟⲥⲧ[ⲁⲥ]ⲓ̣ⲥ <text:line-break/><text:span text:style-name="T1"> </text:span><text:span text:style-name="T2">(9/18) </text:span> ⲙ̣ⲛ̅ ⲧⲉϥⲉⲛⲉⲣⲅⲉⲓⲁ ⲛ̣[ⲉⲉⲓ]‐ <text:line-break/><text:span text:style-name="T1"> </text:span><text:span text:style-name="T2">(9/19) </text:span> ⲛⲉ ⲛ̅ⲧⲁⲥϫⲟⲟⲩ ⲛ̅ϭ̣ⲓ̣ ⲧ̣[ⲇⲩ]‐ <text:line-break/><text:span text:style-name="T1"> </text:span><text:span text:style-name="T2">(9/20) </text:span> ⲛⲁⲙⲓⲥ ⲙ̅ⲡⲁ ⲧϣⲁⲙⲧ[ⲉ ⲛ̅]‐ <text:line-break/><text:soft-page-break/><text:span text:style-name="T1"> </text:span><text:span text:style-name="T2">(9/21) </text:span> ϭⲁⲙ· 〈ϫⲉ〉 ⲁⲛⲁⲛ ⲧⲏⲣⲛ̅ ⲁⲛ[ⲣ̅ⲁ]‐ <text:line-break/><text:span text:style-name="T1"> </text:span><text:span text:style-name="T2">(9/22) </text:span> ⲛⲁⲭⲱⲣⲓ ⲛⲉⲛ· ⲁϩⲛ̣̅[ϣⲱ]‐ <text:line-break/><text:span text:style-name="T1"> </text:span><text:span text:style-name="T2">(9/23) </text:span> ⲡⲉ ⲉⲛⲕⲁⲣⲁⲉ[ⲓⲧ ⲁⲩⲱ ⲛ̅]‐ <text:line-break/><text:span text:style-name="T1"> </text:span><text:span text:style-name="T2">(9/24) </text:span> ⲧⲁⲣⲛ̅ⲥⲟⲩⲱ̣ⲛ̣[ϥ̅ ⲉⲧⲉ ⲡⲉⲉⲓ ⲡⲉ] <text:line-break/><text:span text:style-name="T1"> </text:span><text:span text:style-name="T2">(9/25) </text:span> ⲡⲁ̣ ⲧϣⲁⲙ[ⲧⲉ ⲛ̅ϭⲁⲙ ⲁϩⲛ̅]‐ <text:line-break/><text:span text:style-name="T1"> </text:span><text:span text:style-name="T2">(9/26) </text:span> ⲡ̣ⲁϩⲧⲛ̅ ⲁϩⲛ̣̅[.....ⲁϩⲛ̅]‐ <text:line-break/><text:span text:style-name="T1"> </text:span><text:span text:style-name="T2">(9/27) </text:span> [ⲥ]ⲙⲟⲩ ⲁⲣⲁ̣ϥ̣[ <text:line-break/><text:span text:style-name="T1"> </text:span><text:span text:style-name="T2">(9/28) </text:span> ⲁϫⲱⲛ ⲛ̣[ <text:line-break/><text:span text:style-name="T1"> </text:span><text:span text:style-name="T2">(9/29) </text:span> ⲁ̣ⲃⲁⲗ· ⲡ̣[......ⲡⲉⲡ̅ⲛ̅ⲁ̅] <text:line-break/><text:span text:style-name="T1"> </text:span><text:span text:style-name="T2">(10/1) </text:span> ⲛ̅ⲁϩⲟⲣⲁⲧⲟⲛ ⲁϥⲡⲱⲧ ⲁϩⲣⲏ‐ <text:line-break/><text:span text:style-name="T1"> </text:span><text:span text:style-name="T2">(10/2) </text:span> ⲓ̈ ⲁⲡⲉϥⲧⲟⲡⲟⲥ· ⲁⲡⲙⲁ ⲧⲏⲣϥ̣̅ <text:line-break/><text:span text:style-name="T1"> </text:span><text:span text:style-name="T2">(10/3) </text:span> ϭⲱⲗⲡ̅ ⲁⲃⲁⲗ· ⲁⲡⲙⲁ ⲧⲏⲣϥ̅ ⲃⲱ̣[ⲗ] <text:line-break/><text:span text:style-name="T1"> </text:span><text:span text:style-name="T2">(10/4) </text:span> ⲁⲃⲁⲗ· ϣⲁ〈ⲛⲧ〉ϥⲙⲉⲉⲧⲉ ⲁⲡⲥⲁ[ϩⲣⲉ] <text:line-break/><text:span text:style-name="T1"> </text:span><text:span text:style-name="T2">(10/5) </text:span> ⲡ̣ⲁⲗⲓⲛ ⲁϥⲓ ⲁⲃⲁⲗ ⲁϥⲧⲣⲉⲡⲙ[ⲁ] <text:line-break/><text:span text:style-name="T1"> </text:span><text:span text:style-name="T2">(10/6) </text:span> [ⲧ]ⲏⲣϥ̅ ⲣ̅ ⲟⲩⲁⲉⲓⲛ· ⲁⲩⲱ ⲁⲡⲙⲁ <text:line-break/><text:span text:style-name="T1"> </text:span><text:span text:style-name="T2">(10/7) </text:span> [ⲧⲏ]ⲣϥ̅ ⲣ ⲟⲩⲁ̣ⲉⲓⲛ· ⲁⲩⲱ ⲁⲩϯ ⲛⲏ‐ <text:line-break/><text:span text:style-name="T1"> </text:span><text:span text:style-name="T2">(10/8) </text:span> [ⲧⲛ̅ ⲙ̅]ⲡⲟⲩⲱⲛ ⲛ̅ϣⲁⲙⲛ̅ⲧ ⲙ̅‐ <text:line-break/><text:span text:style-name="T1"> </text:span><text:span text:style-name="T2">(10/9) </text:span> [ⲡⲉⲡ̅ⲛ̅ⲁ̅] ⲛ̣̅ⲧⲇⲩⲛⲁⲙⲓⲥ ⲙ̅ⲡⲉ̣‐ <text:line-break/><text:span text:style-name="T1"> </text:span><text:span text:style-name="T2">(10/10) </text:span> [ⲧⲉ ⲟⲩⲛⲧ]ⲉϥ ⲙ̅ⲙⲉⲩ ⲛ̅ⲧϣⲁ‐ <text:line-break/><text:span text:style-name="T1"> </text:span><text:span text:style-name="T2">(10/11) </text:span> [ⲙⲧⲉ ⲛ̅ϭⲁⲙ· ⲟⲩ]ⲙⲁⲕⲁⲣⲓⲟⲛ ⲡ[ⲉ] <text:line-break/><text:span text:style-name="T1"> </text:span><text:span text:style-name="T2">(10/12) </text:span> [......ⲡⲁ]ϫⲉϥ ϫⲉ ⲱ ⲛⲏ̣ <text:line-break/><text:span text:style-name="T1"> </text:span><text:span text:style-name="T2">(10/13) </text:span> [ⲉⲧϣⲟⲟⲡ ϩⲛ̅ ⲛ]ⲉⲉⲓⲙⲁ· ϩⲁⲯ <text:line-break/><text:span text:style-name="T1"> </text:span><text:span text:style-name="T2">(10/14) </text:span> [ⲁⲧⲣⲉⲕ]ⲣ̣̅[ⲛⲟ]ⲉⲓ ⲛ̅ⲛⲉⲧϫⲁⲥⲓ <text:line-break/><text:span text:style-name="T1"> </text:span><text:span text:style-name="T2">(10/15) </text:span> ⲁ̣ⲛ̣[ⲉ]ⲉⲓ· ⲁⲩⲱ ⲛ̅ⲕϫⲟⲟⲩ ⲛ̅ⲛ̅‐ <text:line-break/><text:span text:style-name="T1"> </text:span><text:span text:style-name="T2">(10/16) </text:span> ⲇⲩ[ⲛ]ⲁ̣ⲙⲓⲥ· ϫⲉ ⲕⲛⲁϣⲱⲡ[ⲉ] <text:line-break/><text:span text:style-name="T1"> </text:span><text:span text:style-name="T2">(10/17) </text:span> ⲉ[ⲕⲥⲁ]ⲧⲡ̅ ⲛ̅ⲧⲉ ⲛⲉⲧⲥⲁⲧⲡ̅ <text:line-break/><text:span text:style-name="T1"> </text:span><text:span text:style-name="T2">(10/18) </text:span> [ⲁⲛϩ]ⲁ̣ⲉ̣ⲉⲩ ⲛ̅ⲛⲉⲟⲩⲁⲉⲓϣ <text:line-break/><text:span text:style-name="T1"> </text:span><text:span text:style-name="T2">(10/19) </text:span> [ⲉϥⲡ]ⲏⲧ ⲁⲡⲥⲁϩⲣⲉ ⲛ̅ϭⲓ ⲡ’ⲉⲡ̅ⲛ̅ⲁ̅ <text:line-break/><text:span text:style-name="T1"> </text:span><text:span text:style-name="T2">(10/20) </text:span> ⲛ̣̅ⲁϩⲟⲣⲁⲧⲟⲛ· ⲁⲩⲱ ⲛ̅ⲧⲱⲧⲛ̅ <text:line-break/><text:span text:style-name="T1"> </text:span><text:span text:style-name="T2">(10/21) </text:span> [ϩⲱⲧ]ⲧ̣ⲏⲛⲉ ⲡⲱⲧ ⲛⲙ̅ⲙⲉϥ <text:line-break/><text:span text:style-name="T1"> </text:span><text:span text:style-name="T2">(10/22) </text:span> [ⲁⲡⲥⲁϩⲣ]ⲉ· ⲉⲩⲛ̅ⲧⲏⲧⲛ̅ ⲙ̅‐ <text:line-break/><text:span text:style-name="T1"> </text:span><text:span text:style-name="T2">(10/23) </text:span> [ⲙⲉⲩ ⲙ̅ⲡ]ⲛ̣ⲁϭ ⲛ̅ⲕⲗⲁⲙ ⲉⲧ <text:line-break/><text:span text:style-name="T1"> </text:span><text:span text:style-name="T2">(10/24) </text:span> [......] ϩⲙ̅ ⲡⲉϩⲟⲟⲩ ⲇⲉ <text:line-break/><text:span text:style-name="T1"> </text:span><text:span text:style-name="T2">(10/25) </text:span> [ 8+- ]ⲛⲁⲛⲉⲩⲉ̣ <text:line-break/><text:span text:style-name="T1"> </text:span><text:span text:style-name="T2">(10/26) </text:span> [ 8+- ]ⲡⲱⲧ ⲁⲡⲥⲁ̣ϩ̣‐ <text:line-break/><text:span text:style-name="T1"> </text:span><text:span text:style-name="T2">(10/27) </text:span> [ⲣⲉ....ⲁ]ⲩ̣ⲱ ⲛⲁⲓⲥⲑⲏ‐ <text:line-break/><text:span text:style-name="T1"> </text:span><text:span text:style-name="T2">(10/28) </text:span> [ⲧⲟⲥ.....ⲟⲩ]ⲁ̣ⲛϩ ⲁⲃⲁ[ⲗ] <text:line-break/><text:span text:style-name="T1"> </text:span><text:span text:style-name="T2">(10/29) </text:span> [ 10+- ] ⲁⲩⲱ ⲥⲉ <text:line-break/><text:span text:style-name="T1"> </text:span><text:span text:style-name="T2">(13/14) </text:span> (14 lines missing) <text:line-break/><text:span text:style-name="T1"> </text:span><text:span text:style-name="T2">(13/15) </text:span> ⲧⲛⲟ̣ⲏⲥ̣[ⲓⲥ] ⲉϥϣ[ⲟ]ⲟⲡ ⲛ̣̅ϣⲁ <text:line-break/><text:span text:style-name="T1"> </text:span><text:span text:style-name="T2">(13/16) </text:span> ⲁⲛⲏϩⲉ ⲉⲙ̣[ⲛ̅]ⲧⲉϥ [ⲟ]ⲩⲥⲓⲁ ⲙ̅‐ <text:line-break/><text:span text:style-name="T1"> </text:span><text:span text:style-name="T2">(13/17) </text:span> [ⲙ]ⲉⲩ ⲙ̅ⲡ̣[ⲉ]ⲧ̣ϣⲟⲟ̣ⲡ ⲉⲧⲕⲁ‐ <text:line-break/><text:span text:style-name="T1"> </text:span><text:span text:style-name="T2">(13/18) </text:span> [ⲣⲁⲉ]ⲓ̣ⲧ̣ ⲡⲉⲧ̣ϣ̣ⲟⲟⲡ ϫⲓⲛ ⲛ̅ϣⲁ‐ <text:line-break/><text:span text:style-name="T1"> </text:span><text:span text:style-name="T2">(13/19) </text:span> [ⲣⲡ̅ ⲉⲧⲉ ⲙ]ⲛ̅ⲧⲉ̣[ϥ] ⲟⲩⲥⲓⲁ ⲙ̅ⲙⲉ̣[ⲩ] <text:line-break/><text:span text:style-name="T1"> </text:span><text:span text:style-name="T2">(13/20) </text:span> [ 9+- ] ⲙⲉⲣⲟⲥ ⲛ̅[ <text:line-break/><text:span text:style-name="T1"> </text:span><text:span text:style-name="T2">(13/21) </text:span> [ 7+- ⲁ]ⲧ̣ⲡⲱϣ̣ⲉ· ⲛⲉ̣[ <text:line-break/><text:span text:style-name="T1"> </text:span><text:span text:style-name="T2">(13/22) </text:span> [.....]ⲙⲉⲉⲩⲉ ⲁ̣ⲃ̣[ⲁⲗ] ⲛ̅ⲟⲩ[ <text:line-break/><text:soft-page-break/><text:span text:style-name="T1"> </text:span><text:span text:style-name="T2">(13/23) </text:span> [....].ⲙⲁϩ.[....].ⲉ ⲡ[ <text:line-break/><text:span text:style-name="T1"> </text:span><text:span text:style-name="T2">(13/24) </text:span> [......]..ⲃ̣[...ⲙⲁ]ϩⲯ[ⲓ]‐ <text:line-break/><text:span text:style-name="T1"> </text:span><text:span text:style-name="T2">(13/25) </text:span> [ⲧⲉ 10+- ] ⲅ̣ⲁⲣ̣ <text:line-break/><text:span text:style-name="T1"> </text:span><text:span text:style-name="T2">(13/26) </text:span> [ 13+- ]ⲟⲥ <text:line-break/><text:span text:style-name="T1"> </text:span><text:span text:style-name="T2">(13/27) </text:span> (3 lines missing) <text:line-break/><text:span text:style-name="T1"> </text:span><text:span text:style-name="T2">(14/14) </text:span> (14 lines missing) <text:line-break/><text:span text:style-name="T1"> </text:span><text:span text:style-name="T2">(14/15) </text:span> [.].ϩ.[...]..[.ⲛ]ⲉⲉⲓϣ̣[ⲟ]ⲟ̣[ⲡ] <text:line-break/><text:span text:style-name="T1"> </text:span><text:span text:style-name="T2">(14/16) </text:span> ϩⲛ̅ ⲛⲉ[ⲁ]ⲓⲱⲛ [ⲛⲉ]ⲉⲓ ⲛ̅ⲧⲁϩⲟ̣[ⲩ] <text:line-break/><text:span text:style-name="T1"> </text:span><text:span text:style-name="T2">(14/17) </text:span> ϫⲡⲁⲩ ⲉ̣ⲩⲕⲱ̣[ⲉ] ⲙ̅ⲙⲁⲉⲓ ⲁ̣ϩ̣[ⲓ]‐ <text:line-break/><text:span text:style-name="T1"> </text:span><text:span text:style-name="T2">(14/18) </text:span> ϣⲱⲡⲉ· ϩⲛ̅ ⲛⲉ̣[ⲧ]ⲉ ⲙ̅ⲡⲟ̣[ⲩϫⲡⲁⲩ] <text:line-break/><text:span text:style-name="T1"> </text:span><text:span text:style-name="T2">(14/19) </text:span> ⲁⲗⲗⲁ ⲛⲉⲉⲓϣ̣[ⲟ]ⲟⲡ ϩⲙ̣̅ ⲡ̣[ⲛⲁϭ] <text:line-break/><text:span text:style-name="T1"> </text:span><text:span text:style-name="T2">(14/20) </text:span> ⲛ̣̅ⲁⲓⲱⲛ ⲉⲉⲓ̣[..]...[ <text:line-break/><text:span text:style-name="T1"> </text:span><text:span text:style-name="T2">(14/21) </text:span> [.]ⲁϥ· ⲁⲩⲱ ⲛⲉ̣[ <text:line-break/><text:span text:style-name="T1"> </text:span><text:span text:style-name="T2">(14/22) </text:span> [ⲧ]ϣⲁⲙ̣ⲧ̣ⲉ ⲛ̅ⲇⲩⲛⲁ[ⲙⲓⲥ <text:line-break/><text:span text:style-name="T1"> </text:span><text:span text:style-name="T2">(14/23) </text:span> ⲡ̣ⲉⲧⲉ̣ [ⲟⲩⲛⲧ]ⲉϥ ⲙ̅ⲙ̣[ⲉⲩ ⲛ̅]‐ <text:line-break/><text:span text:style-name="T1"> </text:span><text:span text:style-name="T2">(14/24) </text:span> ⲧ̣ϣⲁ̣[ⲙⲧⲉ ⲛ̅ϭ]ⲁⲙ· ⲧ[ϣⲁⲙⲧⲉ ⲛ̅]‐ <text:line-break/><text:span text:style-name="T1"> </text:span><text:span text:style-name="T2">(14/25) </text:span> ⲇ̣ⲩ[ⲛⲁⲙⲓⲥ <text:line-break/><text:span text:style-name="T1"> </text:span><text:span text:style-name="T2">(14/26) </text:span> ⲙⲛ̣̅ [ <text:line-break/><text:span text:style-name="T1"> </text:span><text:span text:style-name="T2">(14/27) </text:span> (3 lines missing) <text:line-break/><text:span text:style-name="T1"> </text:span><text:span text:style-name="T2">(15/1) </text:span> [.ⲡ]ⲉ̣ⲧⲕⲁⲣⲁⲉⲓⲧ ⲙⲛ̣̅ ⲡⲁ̣ <text:line-break/><text:span text:style-name="T1"> </text:span><text:span text:style-name="T2">(15/2) </text:span> [ⲧϣ]ⲁⲙⲛⲧⲉ ⲛ̅ϭⲁⲙ [ <text:line-break/><text:span text:style-name="T1"> </text:span><text:span text:style-name="T2">(15/3) </text:span> [. ⲡ]ⲉⲧ→ⲉ← ⲙⲛ̅ⲧⲉϥ ⲡⲛⲟ̣[ⲏ ⲙ̅ⲙⲉⲩ] <text:line-break/><text:span text:style-name="T1"> </text:span><text:span text:style-name="T2">(15/4) </text:span> [ⲁϩ]ⲛ̅ⲱ̣[ϩ]ⲉ ⲁⲣⲉⲧⲛ̣̅ [ <text:line-break/><text:span text:style-name="T1"> </text:span><text:span text:style-name="T2">(15/5) </text:span> [......].ⲁ ϩⲙ̅ ⲡ̣[ <text:line-break/><text:span text:style-name="T1"> </text:span><text:span text:style-name="T2">(15/6) </text:span> (6 lines missing) <text:line-break/><text:span text:style-name="T1"> </text:span><text:span text:style-name="T2">(15/7) </text:span> [ 7+- ].[ <text:line-break/><text:span text:style-name="T1"> </text:span><text:span text:style-name="T2">(15/8) </text:span> [.ⲁ]ϩ̣ⲛ̣̅ⲉ̣ⲓ ⲁϩⲟⲩⲛ [ <text:line-break/><text:span text:style-name="T1"> </text:span><text:span text:style-name="T2">(15/9) </text:span> [..] ⲙ̣̅ⲡⲛⲟⲏ̣ [ <text:line-break/><text:span text:style-name="T1"> </text:span><text:span text:style-name="T2">(15/10) </text:span> (+-15 lines missing) <text:line-break/><text:span text:style-name="T1"> </text:span><text:span text:style-name="T2">(16/1) </text:span> [ⲉⲧⲉ] ⲙⲛ̅ⲧⲉϥ ⲡⲛⲟ̣ⲏ ⲙ̅ⲙ[ⲉⲩ] <text:line-break/><text:span text:style-name="T1"> </text:span><text:span text:style-name="T2">(16/2) </text:span> [ⲁⲩⲱ ϥϣ]ⲟⲟⲡ ϩⲛ̅ ⲟⲩⲙⲛ̅ⲧ[ <text:line-break/><text:span text:style-name="T1"> </text:span><text:span text:style-name="T2">(16/3) </text:span> [....ⲧⲏ]ⲣ̣ϥ̅· ⲁⲩⲱ ⲁϩⲓⲛⲉⲩ <text:line-break/><text:span text:style-name="T1"> </text:span><text:span text:style-name="T2">(16/4) </text:span> [ 8+- ]ⲧϥ̅ ⲁⲧⲛ[ⲁ]ϭ ⲛ̣̅ <text:line-break/><text:span text:style-name="T1"> </text:span><text:span text:style-name="T2">(16/5) </text:span> [ 7+- ] ⲁⲩⲥⲟⲩ[ⲱⲱ]ⲛ[ϥ̅ <text:line-break/><text:span text:style-name="T1"> </text:span><text:span text:style-name="T2">(16/6) </text:span> (6 lines missing) <text:line-break/><text:span text:style-name="T1"> </text:span><text:span text:style-name="T2">(16/12) </text:span> [ 7+- ]ⲉⲥ ⲁⲣⲏ̣ϫ̣[ <text:line-break/><text:span text:style-name="T1"> </text:span><text:span text:style-name="T2">(16/13) </text:span> [ 11+- ] ⲁⲩⲱ ⲁϩ[ⲓ <text:line-break/><text:span text:style-name="T1"> </text:span><text:span text:style-name="T2">(16/14) </text:span> [ 11+- ] ⲟⲩ→ⲁ←ⲉ̣ⲉ[ⲧ <text:line-break/><text:span text:style-name="T1"> </text:span><text:span text:style-name="T2">(16/15) </text:span> (15 lines missing) <text:line-break/><text:span text:style-name="T1"> </text:span><text:span text:style-name="T2">(17/1) </text:span> [ 11+- ⲣ̅]ⲉⲛⲉⲣⲅⲓ <text:line-break/><text:span text:style-name="T1"> </text:span><text:span text:style-name="T2">(17/2) </text:span> [....] ⲉⲧⲃⲉ ⲉⲩ̣ [ⲁ]ⲛ ⲅⲛⲱⲥ̣ⲓ̣[ⲥ] <text:line-break/><text:span text:style-name="T1"> </text:span><text:span text:style-name="T2">(17/3) </text:span> [.....]ⲁⲧⲥ̣ⲁ̣ⲩ̣ⲛⲉ̣ ⲁⲩⲱ [ <text:line-break/><text:span text:style-name="T1"> </text:span><text:span text:style-name="T2">(17/4) </text:span> [ 7+- ] ϥⲣ̅ⲕⲓⲛⲇⲩⲛⲉ̣[ⲩⲉ] <text:line-break/><text:span text:style-name="T1"> </text:span><text:span text:style-name="T2">(17/5) </text:span> [......ⲁ]ⲧⲣ̣ⲉϥϣ̣ⲱ̣ⲡⲉ <text:line-break/><text:span text:style-name="T1"> </text:span><text:span text:style-name="T2">(17/6) </text:span> (1 line missing) <text:line-break/><text:span text:style-name="T1"> </text:span><text:span text:style-name="T2">(17/7) </text:span> [ 10+- ]ⲉ.ⲉ̣.[ <text:line-break/><text:span text:style-name="T1"> </text:span><text:span text:style-name="T2">(17/8) </text:span> [ 9+- ⲁ]ⲩⲱ .[ <text:line-break/><text:soft-page-break/><text:span text:style-name="T1"> </text:span><text:span text:style-name="T2">(17/9) </text:span> [ 10+- ] ⲉⲧⲃⲉ̣ <text:line-break/><text:span text:style-name="T1"> </text:span><text:span text:style-name="T2">(17/10) </text:span> [ 9+- ]. ϩⲛ̅ [ <text:line-break/><text:span text:style-name="T1"> </text:span><text:span text:style-name="T2">(17/11) </text:span> [ 11+- ]ⲙ̣̅[ <text:line-break/><text:span text:style-name="T1"> </text:span><text:span text:style-name="T2">(17/12) </text:span> (3 lines missing) <text:line-break/><text:span text:style-name="T1"> </text:span><text:span text:style-name="T2">(17/15) </text:span> [ 7+- ] ⲛ̣ⲏ ⲉⲧⲙ̣̅ⲙⲁⲩ <text:line-break/><text:span text:style-name="T1"> </text:span><text:span text:style-name="T2">(17/16) </text:span> [.....ϩⲁ]ⲯ ⲇⲉ ⲁⲧⲣⲉⲟⲩ <text:line-break/><text:span text:style-name="T1"> </text:span><text:span text:style-name="T2">(17/17) </text:span> [ 8+- ] ⲙⲛ̅ⲧⲉϥ ⲉⲓⲛⲉ <text:line-break/><text:span text:style-name="T1"> </text:span><text:span text:style-name="T2">(17/18) </text:span> [ 9+- ]ⲛ̣ ⲁⲡ̣ⲓⲟⲩⲉⲉⲓ <text:line-break/><text:span text:style-name="T1"> </text:span><text:span text:style-name="T2">(17/19) </text:span> [ 9+- ]ϣ[ⲟ]ⲟⲡ ϩⲁⲧⲉ‐ <text:line-break/><text:span text:style-name="T1"> </text:span><text:span text:style-name="T2">(17/20) </text:span> [ϩⲏ 8+- ] →ⲡ←ⲙⲉⲉⲩⲉ ⲉ̣[ <text:line-break/><text:span text:style-name="T1"> </text:span><text:span text:style-name="T2">(17/21) </text:span> [ 8+- ϫⲓ]ⲛ ⲛ̅ϣⲁⲣⲡ̣̅ <text:line-break/><text:span text:style-name="T1"> </text:span><text:span text:style-name="T2">(17/22) </text:span> [ 11+- ]ⲡⲉⲧⲉ ⲙ. <text:line-break/><text:span text:style-name="T1"> </text:span><text:span text:style-name="T2">(17/23) </text:span> [ 10+- ]ⲏ̣ⲩ ⲁⲃ̣[ⲁⲗ] <text:line-break/><text:span text:style-name="T1"> </text:span><text:span text:style-name="T2">(17/24) </text:span> [ 13+- ]ⲉⲓⲉ[ <text:line-break/><text:span text:style-name="T1"> </text:span><text:span text:style-name="T2">(17/25) </text:span> [ +-14 ]ⲉⲥϫ[ <text:line-break/><text:span text:style-name="T1"> </text:span><text:span text:style-name="T2">(17/26) </text:span> [ 14+- ].ⲥⲟ̣[ <text:line-break/><text:span text:style-name="T1"> </text:span><text:span text:style-name="T2">(17/27) </text:span> (3 lines missing) <text:line-break/><text:span text:style-name="T1"> </text:span><text:span text:style-name="T2">(18/1) </text:span> ⲛⲉⲉⲓ ⲁ̣[ <text:line-break/><text:span text:style-name="T1"> </text:span><text:span text:style-name="T2">(18/2) </text:span> ⲛⲉⲩ ⲁ[...] ϩⲙ̣̅ ⲯ̣ⲓ̣ⲧ̣[ⲉ...ⲑⲉ]‐ <text:line-break/><text:span text:style-name="T1"> </text:span><text:span text:style-name="T2">(18/3) </text:span> [ⲃ]ⲇ̣ⲟⲙⲁⲥ̣ ⲛ̅ⲕⲟⲥⲙⲟ̣[ⲥ <text:line-break/><text:span text:style-name="T1"> </text:span><text:span text:style-name="T2">(18/4) </text:span> [ⲟ]ⲩ ϩⲛ̅ ⲟⲩϩⲟⲟⲩ ⲛ̣̅[ <text:line-break/><text:span text:style-name="T1"> </text:span><text:span text:style-name="T2">(18/5) </text:span> ϣⲁ̣ ⲁ̣ⲛⲏϩⲉ· ⲉ[ <text:line-break/><text:span text:style-name="T1"> </text:span><text:span text:style-name="T2">(18/6) </text:span> [.....].[ <text:line-break/><text:span text:style-name="T1"> </text:span><text:span text:style-name="T2">(18/7) </text:span> [...]ⲛ̅ϩⲏ[ <text:line-break/><text:span text:style-name="T1"> </text:span><text:span text:style-name="T2">(18/8) </text:span> [...]ⲙⲁⲁ[ <text:line-break/><text:span text:style-name="T1"> </text:span><text:span text:style-name="T2">(18/9) </text:span> [...]ⲣ̣ⲟⲩ[ <text:line-break/><text:span text:style-name="T1"> </text:span><text:span text:style-name="T2">(18/10) </text:span> [....]ⲧⲃ̣[ <text:line-break/><text:span text:style-name="T1"> </text:span><text:span text:style-name="T2">(18/11) </text:span> (3 lines missing) <text:line-break/><text:span text:style-name="T1"> </text:span><text:span text:style-name="T2">(18/14) </text:span> .ⲉⲡ̣[.] ⲁ̣ⲩⲱ .[....ⲙⲛ̅ⲛ̅]‐ <text:line-break/><text:span text:style-name="T1"> </text:span><text:span text:style-name="T2">(18/15) </text:span> ⲥⲁ ϩⲁϩ ⲛ̅ⲣⲁⲙ[ⲡⲉ...ⲛ̅]‐ <text:line-break/><text:span text:style-name="T1"> </text:span><text:span text:style-name="T2">(18/16) </text:span> ⲧⲁⲣⲓⲛⲉⲩ ⲁⲡ[ⲓⲱⲧ ⲁϩⲓⲥⲟⲩ]‐ <text:line-break/><text:span text:style-name="T1"> </text:span><text:span text:style-name="T2">(18/17) </text:span> ⲱⲛϥ̅ ⲁⲩⲱ ⲁ̣[ <text:line-break/><text:span text:style-name="T1"> </text:span><text:span text:style-name="T2">(18/18) </text:span> ϩⲁϩ ⲛ̅.[ <text:line-break/><text:span text:style-name="T1"> </text:span><text:span text:style-name="T2">(18/19) </text:span> ⲙⲉⲣⲓⲕ̣ⲟⲛ̣ [ <text:line-break/><text:span text:style-name="T1"> </text:span><text:span text:style-name="T2">(18/20) </text:span> ϣⲁ ⲁⲛⲏϩ[ⲉ <text:line-break/><text:span text:style-name="T1"> </text:span><text:span text:style-name="T2">(18/21) </text:span> ⲛ̅ⲛ̅ϩⲩⲗ̣[ⲓⲕⲟⲥ <text:line-break/><text:span text:style-name="T1"> </text:span><text:span text:style-name="T2">(18/22) </text:span> [ⲛ̅]ⲕ̣ⲟⲥⲙ[ⲓⲕⲟⲥ <text:line-break/><text:span text:style-name="T1"> </text:span><text:span text:style-name="T2">(18/23) </text:span> ⲡ̣ⲥⲁϩ[ⲣⲉ <text:line-break/><text:span text:style-name="T1"> </text:span><text:span text:style-name="T2">(18/24) </text:span> [ⲗ]ⲟⲓⲡ̣[ⲟⲛ <text:line-break/><text:span text:style-name="T1"> </text:span><text:span text:style-name="T2">(18/25) </text:span> ⲛ̣̅ⲧⲟ̣[ <text:line-break/><text:span text:style-name="T1"> </text:span><text:span text:style-name="T2">(18/26) </text:span> [.].[ <text:line-break/><text:span text:style-name="T1"> </text:span><text:span text:style-name="T2">(18/27) </text:span> (3 lines missing) <text:line-break/><text:span text:style-name="T1"> </text:span><text:span text:style-name="T2">(19/12) </text:span> (12 lines missing) <text:line-break/><text:span text:style-name="T1"> </text:span><text:span text:style-name="T2">(19/13) </text:span> [ 7+- ].ⲉ ⲉϥ[ <text:line-break/><text:span text:style-name="T1"> </text:span><text:span text:style-name="T2">(19/14) </text:span> [......]ⲉ ⲟⲩⲛ.[ <text:line-break/><text:span text:style-name="T1"> </text:span><text:span text:style-name="T2">(19/15) </text:span> [....ⲁ]ⲃⲁⲗ ϩⲛ̅ ⲛ[ <text:line-break/><text:span text:style-name="T1"> </text:span><text:span text:style-name="T2">(19/16) </text:span> [....ⲁ]ϩⲟⲩⲛ ⲁⲛ[ⲉ]ⲧⲣ̅[ <text:line-break/><text:soft-page-break/><text:span text:style-name="T1"> </text:span><text:span text:style-name="T2">(19/17) </text:span> [......]ⲏⲧⲟⲩ ⲁϩⲟⲩⲛ [ <text:line-break/><text:span text:style-name="T1"> </text:span><text:span text:style-name="T2">(19/18) </text:span> [......] ⲉ̣ⲣⲓⲟⲛⲟⲙⲁⲍⲉ <text:line-break/><text:span text:style-name="T1"> </text:span><text:span text:style-name="T2">(19/19) </text:span> [ⲙ̅ⲙⲁⲩ ⲁⲩ]ⲱ̣ ⲧⲟⲩⲟⲛⲟ̣ⲙ̣[ⲁ]‐ <text:line-break/><text:span text:style-name="T1"> </text:span><text:span text:style-name="T2">(19/20) </text:span> [ⲥⲓⲁ ⲉⲣⲓ ⲙ]ⲛ̣̅ⲧⲣ→ⲉ← ⲟⲩ →ⲉ← ⲉⲧ̣[ⲧⲏ]‐ <text:line-break/><text:span text:style-name="T1"> </text:span><text:span text:style-name="T2">(19/21) </text:span> [ⲛⲉ ϫⲉ ⲧⲉⲧ]ⲛ̣̅ϭⲁϫⲃ̅ ⲁⲧ̣[ⲟⲩ] <text:line-break/><text:span text:style-name="T1"> </text:span><text:span text:style-name="T2">(19/22) </text:span> [......]ⲙ̣ⲛ̅ ⲧⲟⲩϩⲩⲡⲟ[ⲥ]‐ <text:line-break/><text:span text:style-name="T1"> </text:span><text:span text:style-name="T2">(19/23) </text:span> [ⲧⲁⲥⲓⲥ· ⲗⲟⲓ]ⲡⲟ[ⲛ] ⲇⲉ ϩⲟ̣[ⲧⲁⲛ] <text:line-break/><text:span text:style-name="T1"> </text:span><text:span text:style-name="T2">(19/24) </text:span> [ 10+- ].ⲙ[ <text:line-break/><text:span text:style-name="T1"> </text:span><text:span text:style-name="T2">(19/25) </text:span> [ 11+- ]..[ <text:line-break/><text:span text:style-name="T1"> </text:span><text:span text:style-name="T2">(19/26) </text:span> (+-4 lines missing) <text:line-break/><text:span text:style-name="T1"> </text:span><text:span text:style-name="T2">(20/12) </text:span> (12 lines missing) <text:line-break/><text:span text:style-name="T1"> </text:span><text:span text:style-name="T2">(20/13) </text:span> [...].[.ⲁⲛ.[ <text:line-break/><text:span text:style-name="T1"> </text:span><text:span text:style-name="T2">(20/14) </text:span> [...] ⲉⲑⲏⲡ [ <text:line-break/><text:span text:style-name="T1"> </text:span><text:span text:style-name="T2">(20/15) </text:span> [..ⲧ]ⲙ̣ⲁϩϣⲁⲙ[ⲧⲉ ⲛ̅ⲇⲩⲛⲁ]‐ <text:line-break/><text:span text:style-name="T1"> </text:span><text:span text:style-name="T2">(20/16) </text:span> ⲙⲓⲥ̣ ⲧⲙⲛ̅ⲧⲁⲡ̣[ⲉ ⲇⲉ ⲙ̅ⲙⲁ]‐ <text:line-break/><text:span text:style-name="T1"> </text:span><text:span text:style-name="T2">(20/17) </text:span> ⲕ̣ⲁⲣ̣ⲓⲟⲥ ⲁⲥϫⲟⲟ[ⲥ <text:line-break/><text:span text:style-name="T1"> </text:span><text:span text:style-name="T2">(20/18) </text:span> ϩⲛ̅ ⲛⲉⲉⲓ ⲙⲛ̅[ <text:line-break/><text:span text:style-name="T1"> </text:span><text:span text:style-name="T2">(20/19) </text:span> ⲛ̅ϭⲓ ⲧⲉⲧⲉ ⲙ[ⲛ̅ⲧⲉⲥ <text:line-break/><text:span text:style-name="T1"> </text:span><text:span text:style-name="T2">(20/20) </text:span> ⲙⲛ̅ ⲉⲁⲩ ⲅⲁⲣ̣ [ <text:line-break/><text:span text:style-name="T1"> </text:span><text:span text:style-name="T2">(20/21) </text:span> [ⲟ]ⲩⲇⲉ ⲡⲉⲧⲉ̣ [ <text:line-break/><text:span text:style-name="T1"> </text:span><text:span text:style-name="T2">(20/22) </text:span> ⲕⲁⲓⲅⲁⲣ ⲡⲉⲧ̣[ⲉ <text:line-break/><text:span text:style-name="T1"> </text:span><text:span text:style-name="T2">(20/23) </text:span> [ⲙ̅]ⲙⲉⲩ ⲟⲩⲡ̣[ <text:line-break/><text:span text:style-name="T1"> </text:span><text:span text:style-name="T2">(20/24) </text:span> [..] ⲅ̣ⲁⲣ [ <text:line-break/><text:span text:style-name="T1"> </text:span><text:span text:style-name="T2">(20/25) </text:span> [..]..[ <text:line-break/><text:span text:style-name="T1"> </text:span><text:span text:style-name="T2">(20/26) </text:span> (+-4 lines missing) <text:line-break/><text:span text:style-name="T1"> </text:span><text:span text:style-name="T2">(21/12) </text:span> (+-12 lines missing) <text:line-break/><text:span text:style-name="T1"> </text:span><text:span text:style-name="T2">(21/13) </text:span> [ 11+- ]ⲕ̣ⲟ[ <text:line-break/><text:span text:style-name="T1"> </text:span><text:span text:style-name="T2">(21/14) </text:span> [ 7+- ]ⲙ̣ⲛ̅ ⲛ̅ⲍⲱ̣[ⲇⲓⲟⲛ <text:line-break/><text:span text:style-name="T1"> </text:span><text:span text:style-name="T2">(21/15) </text:span> [......]ⲙⲛ̅ ⲛ̅.[ <text:line-break/><text:span text:style-name="T1"> </text:span><text:span text:style-name="T2">(21/16) </text:span> [ 7+- ]ⲟ ⲙⲛ̣̅ ..[ <text:line-break/><text:span text:style-name="T1"> </text:span><text:span text:style-name="T2">(21/17) </text:span> [......ⲉ]ⲧⲉ ⲙ[ⲛ̅]ⲧ̣ⲟ[ⲩ <text:line-break/><text:span text:style-name="T1"> </text:span><text:span text:style-name="T2">(21/18) </text:span> [ 7+- ].ϫⲡⲟ ⲁ̣[ <text:line-break/><text:span text:style-name="T1"> </text:span><text:span text:style-name="T2">(21/19) </text:span> [.....ⲕⲩ]ⲗ̣ⲓⲥⲓⲥ ⲟ[ <text:line-break/><text:span text:style-name="T1"> </text:span><text:span text:style-name="T2">(21/20) </text:span> [ 7+- ]ⲯⲩⲭⲏ ⲇ[ⲉ..]. <text:line-break/><text:span text:style-name="T1"> </text:span><text:span text:style-name="T2">(21/21) </text:span> [.....]...ⲙ̅ⲙⲉⲩ.... <text:line-break/><text:span text:style-name="T1"> </text:span><text:span text:style-name="T2">(21/22) </text:span> [....ⲥ]ⲱⲙⲁ ⲛ̅ⲧⲉⲉⲓⲙⲛ̣̅[ⲧ] <text:line-break/><text:span text:style-name="T1"> </text:span><text:span text:style-name="T2">(21/23) </text:span> [.....]ⲯⲩⲭⲏ ⲛ̅ⲧⲡⲉ̣ <text:line-break/><text:span text:style-name="T1"> </text:span><text:span text:style-name="T2">(21/24) </text:span> [....ⲙ̅]ⲡⲕⲱⲧⲉ [ <text:line-break/><text:span text:style-name="T1"> </text:span><text:span text:style-name="T2">(21/25) </text:span> [....]ⲥⲭⲏⲙⲁ ⲉ[ <text:line-break/><text:span text:style-name="T1"> </text:span><text:span text:style-name="T2">(21/26) </text:span> [....].ⲏ̣ ⲉϥⲟⲉⲓ ⲛ̣̅[ <text:line-break/><text:span text:style-name="T1"> </text:span><text:span text:style-name="T2">(21/27) </text:span> (+-13 lines missing) <text:line-break/><text:span text:style-name="T1"> </text:span><text:span text:style-name="T2">(22/12) </text:span> (+-12 lines missing) <text:line-break/><text:span text:style-name="T1"> </text:span><text:span text:style-name="T2">(22/13) </text:span> [..]ⲛ̣ⲟ̣[ <text:line-break/><text:span text:style-name="T1"> </text:span><text:span text:style-name="T2">(22/14) </text:span> [...]ⲉⲩⲙⲁ̣[ <text:line-break/><text:span text:style-name="T1"> </text:span><text:span text:style-name="T2">(22/15) </text:span> [....]ⲛⲉⲧⲉ [ <text:line-break/><text:span text:style-name="T1"> </text:span><text:span text:style-name="T2">(22/16) </text:span> [..]ⲇ̣ⲉ ⲙ̅ⲙⲉⲩ [ <text:line-break/><text:span text:style-name="T1"> </text:span><text:span text:style-name="T2">(22/17) </text:span> [..]ⲁⲩ· .ⲉⲧ̣ⲡ̣̅[ <text:line-break/><text:soft-page-break/><text:span text:style-name="T1"> </text:span><text:span text:style-name="T2">(22/18) </text:span> [..]ⲉⲩ ⲙ̅ⲡⲥ[ <text:line-break/><text:span text:style-name="T1"> </text:span><text:span text:style-name="T2">(22/19) </text:span> [..ⲛ̅ⲉ]ⲓⲛⲉ ⲧⲏ[ⲣⲟⲩ <text:line-break/><text:span text:style-name="T1"> </text:span><text:span text:style-name="T2">(22/20) </text:span> .[..]ⲉ ⲁⲣⲁⲩ· [ <text:line-break/><text:span text:style-name="T1"> </text:span><text:span text:style-name="T2">(22/21) </text:span> ⲛ̣̅ⲥⲙⲁⲧ ⲧⲏⲣ[ⲟ]ⲩ [ <text:line-break/><text:span text:style-name="T1"> </text:span><text:span text:style-name="T2">(22/22) </text:span> [ⲥⲭ]ⲏⲙⲁ ϩⲱⲥⲧⲉ ⲁⲧ̣[ⲣⲟⲩ <text:line-break/><text:span text:style-name="T1"> </text:span><text:span text:style-name="T2">(22/23) </text:span> [ⲛ̅ⲥ]ⲉ̣ϣⲱⲡⲉ ⲛ̅ⲛ̅[ <text:line-break/><text:span text:style-name="T1"> </text:span><text:span text:style-name="T2">(22/24) </text:span> [..ⲟⲩ]ⲁ̣ⲉ̣ⲉⲧⲟⲩ ⲙ.[ <text:line-break/><text:span text:style-name="T1"> </text:span><text:span text:style-name="T2">(22/25) </text:span> [.....] ⲙⲛ̅ ⲛ̅ⲇⲁ[ <text:line-break/><text:span text:style-name="T1"> </text:span><text:span text:style-name="T2">(22/26) </text:span> [.....] ⲛ̅ⲍⲱⲱⲛ [ <text:line-break/><text:span text:style-name="T1"> </text:span><text:span text:style-name="T2">(22/27) </text:span> [......]ⲉ̣ⲓⲉ ⲙⲛ̅ ⲧ[ <text:line-break/><text:span text:style-name="T1"> </text:span><text:span text:style-name="T2">(22/28) </text:span> (+-2 lines missing) <text:line-break/><text:span text:style-name="T1"> </text:span><text:span text:style-name="T2">(25/1) </text:span> [....]. ⲙ̅ⲙⲉⲩ· ⲁⲗⲗⲁ ⲛⲟⲩ‐ <text:line-break/><text:span text:style-name="T1"> </text:span><text:span text:style-name="T2">(25/2) </text:span> [ⲇ]ⲩⲛⲁⲙⲓⲥ ⲉⲧⲉ ⲛ̅ⲁⲅⲅⲉⲗⲟ[ⲥ] <text:line-break/><text:span text:style-name="T1"> </text:span><text:span text:style-name="T2">(25/3) </text:span> ⲛ̣ⲉ ⲉⲩⲟⲉⲓ ⲙ̅ⲙⲟⲣⲫⲏ ⲛ̅‐ <text:line-break/><text:span text:style-name="T1"> </text:span><text:span text:style-name="T2">(25/4) </text:span> ⲑⲏⲣⲓⲟⲛ ⲁⲩⲱ ⲛ̅ⲍⲱⲟⲛ· <text:line-break/><text:span text:style-name="T1"> </text:span><text:span text:style-name="T2">(25/5) </text:span> ϩⲁⲉⲓ̣ⲛ̣ⲉ ⲛ̅ϩⲏⲧⲟⲩ ⲉⲩϣⲟ[ⲟⲡ ⲛ̅]‐ <text:line-break/><text:span text:style-name="T1"> </text:span><text:span text:style-name="T2">(25/6) </text:span> [ϩⲁϩ] ⲛ̣̅ⲥⲙⲁⲧ· ⲁⲩ[ⲱ] ⲡⲁⲣⲁ‐ <text:line-break/><text:span text:style-name="T1"> </text:span><text:span text:style-name="T2">(25/7) </text:span> [ⲫⲩ]ⲥ̣ⲓⲥ ⲟⲩⲛⲧⲟⲩ ϩⲛϩ̣[ <text:line-break/><text:span text:style-name="T1"> </text:span><text:span text:style-name="T2">(25/8) </text:span> [ⲙ̅ⲙⲉ]ⲩ̣ ⲁⲛⲟⲩⲣⲉⲛ· ⲉⲧϩ[ <text:line-break/><text:span text:style-name="T1"> </text:span><text:span text:style-name="T2">(25/9) </text:span> [....] ⲥⲉ[ⲡⲁⲣ]ϫ̣̅ ⲁⲩⲱ [ <text:line-break/><text:span text:style-name="T1"> </text:span><text:span text:style-name="T2">(25/10) </text:span> [....]ⲁⲉ[..ⲕ]ⲁⲧ̣ⲁ ⲡ[ <text:line-break/><text:span text:style-name="T1"> </text:span><text:span text:style-name="T2">(25/11) </text:span> [..ⲁ]ⲩⲱ .[...] ⲛ̣̅ⲥⲙ̣[ⲁⲧ <text:line-break/><text:span text:style-name="T1"> </text:span><text:span text:style-name="T2">(25/12) </text:span> [....] ⲛⲉⲉⲓ̣ ⲇ̣ⲉ ⲉⲧϣ[ⲟ]ⲟ̣[ⲡ] <text:line-break/><text:span text:style-name="T1"> </text:span><text:span text:style-name="T2">(25/13) </text:span> [ⲛ̅ⲉⲓ]ⲛⲉ →ⲛ̅ⲧⲉⲥⲙⲏ← ⲕⲁⲧⲁ ⲡⲙⲁϩϣⲁ̣‐ <text:line-break/><text:span text:style-name="T1"> </text:span><text:span text:style-name="T2">(25/14) </text:span> [ⲙ]ⲛ̣̅[ⲧ]· ⲁⲃⲁⲗ ϩⲛ̅ 〈ⲧ〉ⲟⲩⲥⲓⲁ [ⲛⲉ] <text:line-break/><text:span text:style-name="T1"> </text:span><text:span text:style-name="T2">(25/15) </text:span> [ⲁ]ⲩⲱ ⲉⲧⲃⲉ ⲛⲉⲉⲓ· ⲥⲉⲣ[ⲱ]‐ <text:line-break/><text:span text:style-name="T1"> </text:span><text:span text:style-name="T2">(25/16) </text:span> ϣⲉ ⲛ̅ϭⲓ ⲛⲉⲉⲓ ⲧⲏⲣⲟⲩ <text:line-break/><text:span text:style-name="T1"> </text:span><text:span text:style-name="T2">(25/17) </text:span> ⲉⲁϩⲛ̅ϣⲉϫⲉ ⲁⲣⲁⲩ ⲡ[ⲉⲉⲓ] <text:line-break/><text:span text:style-name="T1"> </text:span><text:span text:style-name="T2">(25/18) </text:span> ⲡⲱⲣϫ̅ ⲅⲁⲣ ϣⲁϥϣⲱⲡ̣[ⲉ] <text:line-break/><text:span text:style-name="T1"> </text:span><text:span text:style-name="T2">(25/19) </text:span> ⲁⲛ ⲛ̅ⲛⲉⲉⲓⲙⲁ· ⲕⲁⲧⲁ [ⲑⲉ] <text:line-break/><text:span text:style-name="T1"> </text:span><text:span text:style-name="T2">(25/20) </text:span> ⲛ̅ⲧⲁϩⲛ̅ϫⲟⲟⲥ ϫⲓⲛ ⲛ̣̅[ϣⲁ]‐ <text:line-break/><text:span text:style-name="T1"> </text:span><text:span text:style-name="T2">(25/21) </text:span> [ⲣ]ⲡ̅· ⲡⲗⲏⲛ ⲧⲯⲩⲭⲏ ⲟ̣[ⲩⲛ] <text:line-break/><text:span text:style-name="T1"> </text:span><text:span text:style-name="T2">(25/22) </text:span> [ⲧ]ⲉⲥ ϩⲱⲱⲥ ⲁⲛ ⲙ̅ⲙⲉⲩ 〈ⲛ̅〉 <text:line-break/><text:span text:style-name="T1"> </text:span><text:span text:style-name="T2">(25/23) </text:span> 〈ϩⲉⲛ〉ⲥⲭ̣ⲏⲙⲁ ⲉ〈ⲩ〉ϣⲃ̅ⲃ̣[ⲉⲓⲁ] <text:line-break/><text:span text:style-name="T1"> </text:span><text:span text:style-name="T2">(25/24) </text:span> [ⲉⲓ]ⲧ̣ ⲉϥϣⲟⲟⲡ ⲇⲉ [ϩⲙ̅] <text:line-break/><text:span text:style-name="T1"> </text:span><text:span text:style-name="T2">(25/25) </text:span> [ⲡⲓ]ⲥ̣ⲙⲁⲧ ⲛ̣̅ϭⲓ ⲡⲥⲭ[ⲏⲙⲁ] <text:line-break/><text:span text:style-name="T1"> </text:span><text:span text:style-name="T2">(25/26) </text:span> [ⲛ̅]ⲧⲯⲩⲭⲏ ⲧⲉⲛⲧⲁϩ[ϣⲱ]‐ <text:line-break/><text:span text:style-name="T1"> </text:span><text:span text:style-name="T2">(25/27) </text:span> ⲡ̣ⲉ ⲟⲩⲁⲉⲉⲧⲥ̅· ⲡ̣[ⲥⲭⲏ]‐ <text:line-break/><text:span text:style-name="T1"> </text:span><text:span text:style-name="T2">(25/28) </text:span> ⲙⲁ ⲇⲉ ⲟⲉ[ⲓ ⲙ̅ⲡⲙⲁϩⲥⲛⲉⲩ] <text:line-break/><text:span text:style-name="T1"> </text:span><text:span text:style-name="T2">(26/1) </text:span> ⲙ̅ⲙⲉⲣⲟⲥ ⲛ̅ⲥⲫⲁⲓⲣ̣[ⲓⲕⲟⲛ] <text:line-break/><text:span text:style-name="T1"> </text:span><text:span text:style-name="T2">(26/2) </text:span> ⲉⲣⲉⲡϣⲁⲣⲡ̅ ⲟⲩⲏϩ ⲛ̅ⲥⲱ[ϥ] <text:line-break/><text:span text:style-name="T1"> </text:span><text:span text:style-name="T2">(26/3) </text:span> ⲉ̣̅̅ⲏ̅ⲓ̅ⲟ̅ⲩ̅· ⲛ̅ⲧⲯⲩⲭⲏ ⲛ̅ϫⲡ[ⲟ] <text:line-break/><text:span text:style-name="T1"> </text:span><text:span text:style-name="T2">(26/4) </text:span> ⲟ̣ⲩⲁⲉⲉⲧⲥ̅· ⲁ̅ⲉ̅ⲏ̅ⲓ̅ⲟ̅ⲩ̅ⲱ̅ <text:line-break/><text:span text:style-name="T1"> </text:span><text:span text:style-name="T2">(26/5) </text:span> [ⲡ]ⲙⲁϩⲥⲛⲉⲩ ⲛ̅ⲥⲭⲏⲙⲁ· <text:line-break/><text:span text:style-name="T1"> </text:span><text:span text:style-name="T2">(26/6) </text:span> ⲉ̅ⲏ̅ⲓ̅ⲟ̅ⲩ̣̅̅ ⲁⲃⲁⲗ ϩⲓⲧⲛ̅ ⲛ̣[ⲁ] <text:line-break/><text:span text:style-name="T1"> </text:span><text:span text:style-name="T2">(26/7) </text:span> [ⲧⲥ]ⲙⲏ ⲥⲛ̅ⲧⲉ ⲡϣⲁⲣ[ⲡ̅ ⲉ]‐ <text:line-break/><text:span text:style-name="T1"> </text:span><text:span text:style-name="T2">(26/8) </text:span> [ϥⲟ]ⲩⲏϩ ⲛ̅ⲥⲱⲟⲩ ⲡⲉ [ <text:line-break/><text:soft-page-break/><text:span text:style-name="T1"> </text:span><text:span text:style-name="T2">(26/9) </text:span> [...]ⲟⲛ· ⲁⲩ[ⲱ ⲡ]ⲓ̣ϩ[ <text:line-break/><text:span text:style-name="T1"> </text:span><text:span text:style-name="T2">(26/10) </text:span> [..]ⲟ̣ⲩ ⲡ[...]ⲉⲉⲓ̣[ <text:line-break/><text:span text:style-name="T1"> </text:span><text:span text:style-name="T2">(26/11) </text:span> [..]ⲧ̣ⲛ̅ⲛ̣[...]ⲟⲩ ϩ̣ⲛ̣̅ [ <text:line-break/><text:span text:style-name="T1"> </text:span><text:span text:style-name="T2">(26/12) </text:span> [.]ⲉ ⲙ̅ⲡⲟⲩⲁⲉⲓⲛ ϣⲱ̣[ⲡ] <text:line-break/><text:span text:style-name="T1"> </text:span><text:span text:style-name="T2">(26/13) </text:span> [ⲁⲣ]ⲱⲧⲛ̅ ⲛ̅ⲧⲉⲧⲛ̅ϫⲓ ⲙ̣̅[ⲡⲉ]‐ <text:line-break/><text:span text:style-name="T1"> </text:span><text:span text:style-name="T2">(26/14) </text:span> [ⲥ]ⲡⲉⲣⲙⲁ ⲛ̅ⲁⲧⲧⲉⲕⲟ [ⲛ̅]‐ <text:line-break/><text:span text:style-name="T1"> </text:span><text:span text:style-name="T2">(26/15) </text:span> [ⲧⲉ]ⲧ̣ⲛ̅ϯ ⲕⲁⲣⲡⲟⲥ· ⲁⲩⲱ <text:line-break/><text:span text:style-name="T1"> </text:span><text:span text:style-name="T2">(26/16) </text:span> [ⲛ̅ⲧⲉ]ⲧ̣[ⲛ̅]ⲧⲙ̅ϣⲱⲡⲉ ⲉⲣⲉ‐ <text:line-break/><text:span text:style-name="T1"> </text:span><text:span text:style-name="T2">(26/17) </text:span> [ⲧ]ⲛ̣̅ⲏⲡ ⲁⲛⲉⲧⲉ ⲛⲟⲩⲧⲛ̅ <text:line-break/><text:span text:style-name="T1"> </text:span><text:span text:style-name="T2">(26/18) </text:span> [ⲁⲗ]ⲗⲁ ⲙ̅ⲙⲉ ϫⲉ ⲛⲉⲧϫⲁⲥⲓ <text:line-break/><text:span text:style-name="T1"> </text:span><text:span text:style-name="T2">(26/19) </text:span> [ⲥⲉ]ϣ̣ⲟⲟⲡ ϩⲛ̅ ⲛⲉⲧⲉ ⲟⲩⲛ‐ <text:line-break/><text:span text:style-name="T1"> </text:span><text:span text:style-name="T2">(26/20) </text:span> [ⲧⲟⲩ] ⲥⲙⲏ ⲙ̅ⲙⲉⲩ· ⲁⲩⲱ ⲛⲁ̣ <text:line-break/><text:span text:style-name="T1"> </text:span><text:span text:style-name="T2">(26/21) </text:span> [ⲧⲥ]ⲙⲏ ⲥⲛ̅ⲧⲉ ⲉⲧϣⲟⲟⲡ <text:line-break/><text:span text:style-name="T1"> </text:span><text:span text:style-name="T2">(26/22) </text:span> [ⲛ̅ⲛ]ⲁ̣ϩⲣⲛ̅ ⲛⲉⲉⲓ· ⲛ̅ⲃⲣⲁ‐ <text:line-break/><text:span text:style-name="T1"> </text:span><text:span text:style-name="T2">(26/23) </text:span> [ⲭⲩ ⲇ]ⲉ̣ ⲥⲉϭⲁϫϥ̅· ⲁⲩⲱ ⲛ̅ <text:line-break/><text:span text:style-name="T1"> </text:span><text:span text:style-name="T2">(26/24) </text:span> [....]ⲟ̣ⲟⲩ ⲥ̣ⲉ̣ϣⲟⲟⲡ̣ [ <text:line-break/><text:span text:style-name="T1"> </text:span><text:span text:style-name="T2">(26/25) </text:span> [..]. ϩⲓⲧⲟⲟⲧⲟ̣[ⲩ]· ⲛⲉⲧ[ <text:line-break/><text:span text:style-name="T1"> </text:span><text:span text:style-name="T2">(26/26) </text:span> [...]ⲉ̣ ⲉⲩϩⲛ̅ ⲧⲙⲏⲧⲉ [ <text:line-break/><text:span text:style-name="T1"> </text:span><text:span text:style-name="T2">(26/27) </text:span> [......]..ⲛ̅ⲥⲙⲏ ⲛ̅ⲧⲉ̣ <text:line-break/><text:span text:style-name="T1"> </text:span><text:span text:style-name="T2">(26/28) </text:span> [ⲛ̅ϩⲏⲙⲓⲫⲱⲛ]ⲟⲛ ⲥⲉϫⲁ‐ <text:line-break/><text:span text:style-name="T1"> </text:span><text:span text:style-name="T2">(27/1) </text:span> ⲥⲓ ⲁⲛⲉⲧⲉ ⲙⲛ̅ⲧⲟⲩ ⲥⲙⲏ <text:line-break/><text:span text:style-name="T1"> </text:span><text:span text:style-name="T2">(27/2) </text:span> ⲙ̅ⲙⲉⲩ· ⲛⲉⲧⲕⲏⲃ ⲇⲉ ⲥⲉϫ[ⲁ]‐ <text:line-break/><text:span text:style-name="T1"> </text:span><text:span text:style-name="T2">(27/3) </text:span> ⲥⲓ ⲁⲛⲁ ⲧⲡⲉϣⲉ ⲛ̅ⲥⲙⲏ ⲉ‐ <text:line-break/><text:span text:style-name="T1"> </text:span><text:span text:style-name="T2">(27/4) </text:span> ⲙⲁⲩϣⲃ̅ⲃⲓⲉ· ⲛ̅ⲇⲁⲥⲩ ⲇⲉ <text:line-break/><text:span text:style-name="T1"> </text:span><text:span text:style-name="T2">(27/5) </text:span> ⲥⲉⲥⲁⲧⲡ̅ ⲁⲙ̅ⲯⲓⲗⲟⲛ ⲛ̣[ⲉ]‐ <text:line-break/><text:span text:style-name="T1"> </text:span><text:span text:style-name="T2">(27/6) </text:span> ⲉⲓ ⲉⲙⲛ̅ⲧⲟⲩ ⲥⲙⲏ ⲙ̅ⲙ̣[ⲉⲩ] <text:line-break/><text:span text:style-name="T1"> </text:span><text:span text:style-name="T2">(27/7) </text:span> ⲛⲉⲧϩⲛ̅ ⲧⲙⲏⲧⲉ ⲇⲉ ⲛⲁϣ̣[ⲁⲡ] <text:line-break/><text:span text:style-name="T1"> </text:span><text:span text:style-name="T2">(27/8) </text:span> ⲡⲟⲩϭⲗⲁⲙⲗⲙ̅ ⲉⲧⲟⲩⲛ̣̅[ϩⲏ] <text:line-break/><text:span text:style-name="T1"> </text:span><text:span text:style-name="T2">(27/9) </text:span> ⲧϥ̅· ⲥⲉⲟⲉⲓ ⲛ̅ⲧⲁⲥⲁⲩⲛ̣[ⲉ ⲛ̅]‐ <text:line-break/><text:span text:style-name="T1"> </text:span><text:span text:style-name="T2">(27/10) </text:span> ⲛⲉⲧⲛⲁⲛⲟⲩⲟⲩ· ⲥ̣ⲉ̣[ϭⲗⲙ̅] <text:line-break/><text:span text:style-name="T1"> </text:span><text:span text:style-name="T2">(27/11) </text:span> ⲗⲁⲙⲛ̅ⲧ ⲇⲉ ⲁⲛⲉⲧϩ[ⲛ̅ ⲧⲙⲏ]‐ <text:line-break/><text:span text:style-name="T1"> </text:span><text:span text:style-name="T2">(27/12) </text:span> ⲧⲉ ⲉⲧϭⲁϫⲃ̅· ⲕⲁⲧⲁ ⲉⲓ[ⲛⲉ] <text:line-break/><text:span text:style-name="T1"> </text:span><text:span text:style-name="T2">(27/13) </text:span> 〈ⲥⲉϣⲟⲟⲡ〉 ⲛ̅ⲧⲟⲛⲟⲙ〈ⲁ〉ⲥⲓⲁ ⲛ̅ⲛ̅ⲛ̣[ⲟⲩ] <text:line-break/><text:span text:style-name="T1"> </text:span><text:span text:style-name="T2">(27/14) </text:span> ⲧⲉ ⲙⲛ̅ ⲛ̅ⲁⲅⲅⲉⲗⲟⲥ· ⲟ̣[ⲩⲭⲟ]‐ <text:line-break/><text:span text:style-name="T1"> </text:span><text:span text:style-name="T2">(27/15) </text:span> ⲧⲓ ⲉⲩⲧⲉϩⲧⲱϩ ⲁⲛⲟⲩⲉ̣[ⲣⲏⲩ] <text:line-break/><text:span text:style-name="T1"> </text:span><text:span text:style-name="T2">(27/16) </text:span> ⲕⲁⲧⲁ ⲥⲙⲁⲧ ⲛⲓⲙ· ⲁⲗ̣[ⲗⲁ] <text:line-break/><text:span text:style-name="T1"> </text:span><text:span text:style-name="T2">(27/17) </text:span> ⲙⲟⲛⲟⲛ ⲉⲟⲩⲛ̣[ⲧ]ⲉⲩ [ⲙ̅]‐ <text:line-break/><text:span text:style-name="T1"> </text:span><text:span text:style-name="T2">(27/18) </text:span> ⲙⲉⲩ ⲛ̅ⲛⲟⲩⲉⲣⲅⲁⲥⲓⲁ [ⲉ]‐ <text:line-break/><text:span text:style-name="T1"> </text:span><text:span text:style-name="T2">(27/19) </text:span> ⲛⲁⲛⲟⲩⲥ· ⲙ̅ⲡⲉⲥϣⲱ̣[ⲡⲉ] <text:line-break/><text:span text:style-name="T1"> </text:span><text:span text:style-name="T2">(27/20) </text:span> ⲁⲧⲣⲉⲡⲟⲩ〈ⲟⲩ〉ⲱϣⲉ ϭ̣ⲱ̣[ⲗⲡ] <text:line-break/><text:span text:style-name="T1"> </text:span><text:span text:style-name="T2">(27/21) </text:span> ⲁⲃⲁⲗ· ⲙⲛ̅ⲥⲱⲧⲉ ⲁⲣ̅ ⲛ̣[ⲁⲃⲓ] <text:line-break/><text:span text:style-name="T1"> </text:span><text:span text:style-name="T2">(27/22) </text:span> ⲛ̅ⲕⲣ̅ⲧⲟⲗⲙⲁ ⲁⲧⲣⲉⲕ̣[ⲣ̣̅] <text:line-break/><text:span text:style-name="T1"> </text:span><text:span text:style-name="T2">(27/23) </text:span> ⲭⲣⲁⲥⲑⲁⲓ ⲙ̅ⲡⲛⲁⲃ̣[ⲓ· ϯ]‐ <text:line-break/><text:span text:style-name="T1"> </text:span><text:span text:style-name="T2">(27/24) </text:span> ϫⲟⲩ ⲇⲉ ⲛⲉⲕ ⲉ̣[ⲧⲃⲉ ⲡϣⲁ]‐ <text:line-break/><text:span text:style-name="T1"> </text:span><text:span text:style-name="T2">(27/25) </text:span> ⲙⲛ̅ⲧ ⲛ̅ⲥ̣[ⲭⲏⲙⲁ <text:line-break/><text:span text:style-name="T1"> </text:span><text:span text:style-name="T2">(27/26) </text:span> ⲛ̅ⲧⲉ ⲧⲯⲩ[ⲭⲏ· ⲡⲙⲁϩϣⲁ] <text:line-break/><text:span text:style-name="T1"> </text:span><text:span text:style-name="T2">(27/27) </text:span> ⲙⲛ̅ⲧ ⲛ̅[ⲥⲭⲏⲙⲁ ⲛ̅ⲧⲯⲩⲭⲏ] <text:line-break/><text:soft-page-break/><text:span text:style-name="T1"> </text:span><text:span text:style-name="T2">(27/28) </text:span> ϣⲟⲟ̣ⲡ̣ [ <text:line-break/><text:span text:style-name="T1"> </text:span><text:span text:style-name="T2">(28/1) </text:span> ⲟⲩⲥⲫⲁⲓⲣⲓⲕⲟⲛ ⲡⲉ ⲉϥⲟⲩ‐ <text:line-break/><text:span text:style-name="T1"> </text:span><text:span text:style-name="T2">(28/2) </text:span> ⲏϩ ⲛ̅ⲥⲱϥ· ϩⲓⲧⲛ̅ ⲛⲉⲧⲉ ⲟⲩⲛ <text:line-break/><text:span text:style-name="T1"> </text:span><text:span text:style-name="T2">(28/3) </text:span> ⲥ̣ⲙⲏ ⲙ̅ⲙⲁⲩ ⲛ̅ϩⲁⲡⲗⲟⲩⲛ· <text:line-break/><text:span text:style-name="T1"> </text:span><text:span text:style-name="T2">(28/4) </text:span> ⲉ̅ⲉ̅ⲉ̅· ⲓⲓⲓ ⲟⲟⲟ ⲩⲩⲩ ⲱⲱⲱ <text:line-break/><text:span text:style-name="T1"> </text:span><text:span text:style-name="T2">(28/5) </text:span> ⲛ̣ⲁ ⲧⲥⲙⲏ ⲥⲛ̅ⲧⲉ ⲛⲉⲩϣⲟ‐ <text:line-break/><text:span text:style-name="T1"> </text:span><text:span text:style-name="T2">(28/6) </text:span> ⲟⲡ ⲛ̅ϩⲛ̅ϩⲁⲉⲓⲛⲉ· ⲁⲓ ⲁⲩ· <text:line-break/><text:span text:style-name="T1"> </text:span><text:span text:style-name="T2">(28/7) </text:span> [ⲉ]ⲓ ⲉⲩ· ⲏⲩ· ⲟⲩ· ⲱⲩ· ⲟⲓ ⲏⲓ· <text:line-break/><text:span text:style-name="T1"> </text:span><text:span text:style-name="T2">(28/8) </text:span> [ⲩ]ⲓ ⲱⲓ· ⲁⲩⲉⲓ· ⲉⲩⲏⲩ· ⲟⲓⲟⲩ <text:line-break/><text:span text:style-name="T1"> </text:span><text:span text:style-name="T2">(28/9) </text:span> [ⲅⲅ]ⲅ̣· ⲅⲅⲅ· ⲅⲅⲅ· ⲁⲓⲁⲩ <text:line-break/><text:span text:style-name="T1"> </text:span><text:span text:style-name="T2">(28/10) </text:span> [ⲉⲓⲉⲩ]· ⲏⲩ· ⲟⲓⲟⲩ· ⲱⲩ· ⲅⲅⲅ· <text:line-break/><text:span text:style-name="T1"> </text:span><text:span text:style-name="T2">(28/11) </text:span> [ⲅⲅⲅ]· ⲁⲩⲉⲓⲉⲩ· ⲟⲓⲟⲩ· ⲏⲩ· <text:line-break/><text:span text:style-name="T1"> </text:span><text:span text:style-name="T2">(28/12) </text:span> [ⲛ̅]ⲥⲡ̅ ϣⲁⲙⲛ̅ⲧ ⲛ̅ⲛⲟⲩⲯⲩ‐ <text:line-break/><text:span text:style-name="T1"> </text:span><text:span text:style-name="T2">(28/13) </text:span> ⲭ̣ⲏ ⲛ̅ϩⲁⲩⲧ ⲡⲙⲁϩϣⲁⲙⲛ̅ⲧ <text:line-break/><text:span text:style-name="T1"> </text:span><text:span text:style-name="T2">(28/14) </text:span> ⲛ̣̅ⲥⲭⲏⲙⲁ ⲟⲩⲥⲫⲁⲓⲣⲓⲕⲟⲛ <text:line-break/><text:span text:style-name="T1"> </text:span><text:span text:style-name="T2">(28/15) </text:span> [ⲡⲉ] ⲡⲙⲁϩⲥⲛⲉⲩ ⲛ̅ⲥⲭⲏ‐ <text:line-break/><text:span text:style-name="T1"> </text:span><text:span text:style-name="T2">(28/16) </text:span> [ⲙ]ⲁ ⲉϥⲟⲩⲏϩ ⲛ̅ⲥⲱϥ ⲟⲩⲛ̣‐ <text:line-break/><text:span text:style-name="T1"> </text:span><text:span text:style-name="T2">(28/17) </text:span> [ⲧⲉ]ϥ̣ ⲥⲙ̣ⲏ ⲥⲛ̅ⲧⲉ· ⲧⲯⲩⲭⲏ̣ <text:line-break/><text:span text:style-name="T1"> </text:span><text:span text:style-name="T2">(28/18) </text:span> [ⲛ̅]ϩⲁⲩⲧ ⲡⲉⲥⲙⲁϩϣⲁⲙⲛ̅ⲧ <text:line-break/><text:span text:style-name="T1"> </text:span><text:span text:style-name="T2">(28/19) </text:span> [ⲛ̅]ⲥ̣ⲭⲏⲙⲁ· ϩⲓⲧⲛ̅ ⲛⲉⲧⲉ ⲟⲩⲛ‐ <text:line-break/><text:span text:style-name="T1"> </text:span><text:span text:style-name="T2">(28/20) </text:span> [ⲧⲟⲩ ⲥ]ⲙⲏ ⲉⲧⲟⲉⲓ ⲛ̅ϩⲁⲡⲗⲟⲩⲛ <text:line-break/><text:span text:style-name="T1"> </text:span><text:span text:style-name="T2">(28/21) </text:span> [ⲁⲁ]ⲁ· ⲉⲉⲉ· ⲏⲏⲏ· ⲓⲓⲓ· ⲟⲟⲟ· <text:line-break/><text:span text:style-name="T1"> </text:span><text:span text:style-name="T2">(28/22) </text:span> [ⲩ]ⲩⲩ· ⲱⲱⲱ· ⲱⲱⲱ· ⲱⲱⲱ <text:line-break/><text:span text:style-name="T1"> </text:span><text:span text:style-name="T2">(28/23) </text:span> [ⲁⲩⲱ] ⲡⲉⲉⲓⲥⲭⲏⲙⲁ ϣⲃ̅ⲃ{ⲓ} <text:line-break/><text:span text:style-name="T1"> </text:span><text:span text:style-name="T2">(28/24) </text:span> [ⲉⲓⲁⲉⲓⲧ ⲁ]ⲡϣⲁⲣⲡ̅· ⲥⲉ‐ <text:line-break/><text:span text:style-name="T1"> </text:span><text:span text:style-name="T2">(28/25) </text:span> [ⲧⲛ̅ⲧⲁⲛ]ⲧ̣̅ ⲇⲉ ⲁⲛⲟⲩⲉ‐ <text:line-break/><text:span text:style-name="T1"> </text:span><text:span text:style-name="T2">(28/26) </text:span> [ⲣⲏⲩ ⲁⲩⲱ ⲥⲉ]ⲉⲓⲣⲉ ⲛ̅ϩⲛ̅ <text:line-break/><text:span text:style-name="T1"> </text:span><text:span text:style-name="T2">(28/27) </text:span> [ⲥⲙⲏ ⲙ̅ⲡⲣⲟⲭ]ⲉⲓⲣⲟⲛ ⲛ̅‐ <text:line-break/><text:span text:style-name="T1"> </text:span><text:span text:style-name="T2">(28/28) </text:span> [ⲧⲉⲉⲓϩⲉ· ⲁⲉⲏ]ⲟ̣ⲱ̣· ⲁⲩⲱ ⲁ‐ <text:line-break/><text:span text:style-name="T1"> </text:span><text:span text:style-name="T2">(29/1) </text:span> ⲃⲁⲗ ϩⲓⲧⲟⲟ̣ⲧ̣ⲟⲩ ⲛ̅ⲛⲁ ⲧⲥⲙⲏ <text:line-break/><text:span text:style-name="T1"> </text:span><text:span text:style-name="T2">(29/2) </text:span> ⲥⲛ̅ⲧⲉ· ⲧⲉⲉⲓϩⲉ ⲁⲛ ⲡⲙⲁϩ̣‐ <text:line-break/><text:span text:style-name="T1"> </text:span><text:span text:style-name="T2">(29/3) </text:span> ϥⲧⲁⲩ ⲁⲩⲱ ⲡⲙⲁϩϯⲟⲩ· <text:line-break/><text:span text:style-name="T1"> </text:span><text:span text:style-name="T2">(29/4) </text:span> ⲉⲧⲃⲏⲧⲟⲩ ⲙ̅ⲡⲟⲩⲕⲁⲁⲩ ⲁ̣‐ <text:line-break/><text:span text:style-name="T1"> </text:span><text:span text:style-name="T2">(29/5) </text:span> ϭⲱⲗⲡ ⲁⲃⲁⲗ ⲙ̅ⲡⲙⲁ ⲧⲏ̣[ⲣϥ̅] <text:line-break/><text:span text:style-name="T1"> </text:span><text:span text:style-name="T2">(29/6) </text:span> ⲁⲗⲗⲁ ⲙⲟⲛⲟⲛ̣ ⲛⲉⲧⲟⲩⲁ[ⲛϩ] <text:line-break/><text:span text:style-name="T1"> </text:span><text:span text:style-name="T2">(29/7) </text:span> ⲁⲃⲁⲗ ⲁϩⲟⲩⲧⲥⲉⲃⲉ ⲧⲏⲛ̣[ⲉ] <text:line-break/><text:span text:style-name="T1"> </text:span><text:span text:style-name="T2">(29/8) </text:span> ⲁⲣⲁⲩ ⲁⲧⲣⲉⲧⲛ̅ⲣ̅ⲛⲟⲉⲓ [ⲙ̅]‐ <text:line-break/><text:span text:style-name="T1"> </text:span><text:span text:style-name="T2">(29/9) </text:span> ⲙⲁⲩ ϫⲉⲕⲁⲥⲉ ϩⲱⲟⲩ ⲉ̣[ⲩⲁ]‐ <text:line-break/><text:span text:style-name="T1"> </text:span><text:span text:style-name="T2">(29/10) </text:span> ϣⲓⲛⲉ ⲛ̅ⲥⲉϭⲓⲛⲉ· ϫⲉ [ⲛⲓⲙ] <text:line-break/><text:span text:style-name="T1"> </text:span><text:span text:style-name="T2">(29/11) </text:span> ⲛⲉ ⲧⲏⲣⲟⲩ· ⲏ ⲁⲃⲁⲗ̣ [ϩⲓⲧⲟ]‐ <text:line-break/><text:span text:style-name="T1"> </text:span><text:span text:style-name="T2">(29/12) </text:span> 〈ⲟ〉ⲧⲟⲩ ⲟⲩⲁⲉⲉⲧⲟⲩ ⲟⲩ̣[ <text:line-break/><text:span text:style-name="T1"> </text:span><text:span text:style-name="T2">(29/13) </text:span> ⲏ ⲁⲃⲁⲗ ϩⲓⲧⲛ̅ ⲛⲟⲩⲉⲣ̣[ⲏⲩ] <text:line-break/><text:span text:style-name="T1"> </text:span><text:span text:style-name="T2">(29/14) </text:span> ⲏ ⲁⲟⲩⲱⲛϩ ⲁⲃⲁⲗ ⲛ̅ϩⲛ̅ⲧ̣[ⲁϣ] <text:line-break/><text:span text:style-name="T1"> </text:span><text:span text:style-name="T2">(29/15) </text:span> ⲉⲁⲩⲧⲁϣⲟⲩ ϫⲓⲛ ⲛ̅ϣⲁⲣ̣[ⲡ̅] <text:line-break/><text:span text:style-name="T1"> </text:span><text:span text:style-name="T2">(29/16) </text:span> ⲏ ⲛⲙ̅ⲙ̣ⲟ̣ⲩ ⲟⲩⲁⲉⲉⲧ̣[ⲟⲩ· ⲏ] <text:line-break/><text:span text:style-name="T1"> </text:span><text:span text:style-name="T2">(29/17) </text:span> ⲙⲛ̅ ⲛⲟⲩⲉⲣⲏⲩ· ⲟ̣ⲓⲟⲛ [ⲉⲩ]‐ <text:line-break/><text:span text:style-name="T1"> </text:span><text:span text:style-name="T2">(29/18) </text:span> ϣⲟⲟⲡ ⲙⲛ̅ ⲛⲟⲩⲉⲣⲏ[ⲩ ϩⲛ̅] <text:line-break/><text:soft-page-break/><text:span text:style-name="T1"> </text:span><text:span text:style-name="T2">(29/19) </text:span> ⲟⲩⲥⲙⲏ· ⲉⲓⲧⲉ ⲕⲁⲧⲁ ⲙ̣[ⲉ]‐ <text:line-break/><text:span text:style-name="T1"> </text:span><text:span text:style-name="T2">(29/20) </text:span> ⲣⲟⲥ ⲉⲓⲧⲉ ⲕⲁⲧⲁ ⲉⲓ̣ⲛ̣[ⲉ· ⲥⲉ]‐ <text:line-break/><text:span text:style-name="T1"> </text:span><text:span text:style-name="T2">(29/21) </text:span> ⲟⲩⲁϩ ⲥⲁϩⲛⲉ ⲙ̅ⲙⲁⲩ [ⲁ]‐ <text:line-break/><text:span text:style-name="T1"> </text:span><text:span text:style-name="T2">(29/22) </text:span> ⲣ̅ϩⲩⲡⲟⲧⲁⲥⲥⲉ ⲏ ⲡⲟⲩ[ⲙⲉ]‐ <text:line-break/><text:span text:style-name="T1"> </text:span><text:span text:style-name="T2">(29/23) </text:span> ⲣⲟⲥ ϥⲟⲉⲓ ⲛ̅ϫⲡⲟ· ⲁⲩⲱ̣ [ⲕⲁ]‐ <text:line-break/><text:span text:style-name="T1"> </text:span><text:span text:style-name="T2">(29/24) </text:span> ⲧⲁ ⲉⲓⲛⲉ· ⲏ ϩⲓⲧ̣ⲛ̣̅ [ⲙ̅ⲙⲁ]‐ <text:line-break/><text:span text:style-name="T1"> </text:span><text:span text:style-name="T2">(29/25) </text:span> ⲕⲣⲟⲛ· ⲏ ⲁⲃ̣[ⲁⲗ ϩⲓⲧⲟⲟⲧⲟⲩ] <text:line-break/><text:span text:style-name="T1"> </text:span><text:span text:style-name="T2">(29/26) </text:span> ⲛ̅ⲛⲁ ⲡⲭ̣[ⲣⲟⲛⲟⲥ ⲥⲛⲉⲩ· ⲏ] <text:line-break/><text:span text:style-name="T1"> </text:span><text:span text:style-name="T2">(29/27) </text:span> ⲁⲃⲁⲗ ϩⲓⲧ̣ⲛ̣̅ [ⲛ̅ⲃⲣⲁⲭⲩ ⲉ]‐ <text:line-break/><text:span text:style-name="T1"> </text:span><text:span text:style-name="T2">(29/28) </text:span> ⲧⲥⲁⲃⲕ̅· ⲡ̣[ <text:line-break/><text:span text:style-name="T1"> </text:span><text:span text:style-name="T2">(29/29) </text:span> ⲛⲁ̣[ <text:line-break/><text:span text:style-name="T1"> </text:span><text:span text:style-name="T2">(30/1) </text:span> ⲏ ⲛⲉⲧϫⲁⲥⲓ ⲏ ⲛⲉⲧϩⲛ̅ <text:line-break/><text:span text:style-name="T1"> </text:span><text:span text:style-name="T2">(30/2) </text:span> ⲧⲙⲏⲧⲉ ⲏ ⲛⲉⲧϭⲁϫⲃ̅ <text:line-break/><text:span text:style-name="T1"> </text:span><text:span text:style-name="T2">(30/3) </text:span> [ⲁ]ⲩⲱ 〈ⲛ̅〉ⲥⲩⲙⲫⲱⲛⲟⲛ ⲥⲉ‐ <text:line-break/><text:span text:style-name="T1"> </text:span><text:span text:style-name="T2">(30/4) </text:span> ϣⲟⲟⲡ ⲙⲛ̅ ⲛⲉⲧⲉ ⲟⲩⲛ‐ <text:line-break/><text:span text:style-name="T1"> </text:span><text:span text:style-name="T2">(30/5) </text:span> [ⲧ]ⲟⲩ ⲥⲙⲏ· ⲁⲩⲱ ⲕⲁⲧⲁ ⲙⲉ‐ <text:line-break/><text:span text:style-name="T1"> </text:span><text:span text:style-name="T2">(30/6) </text:span> [ⲣ]ⲟⲥ ⲥⲉⲟⲩ[ⲁ]ϩ̣ ⲥ̣ⲁϩⲛⲉ ⲛⲉⲩ <text:line-break/><text:span text:style-name="T1"> </text:span><text:span text:style-name="T2">(30/7) </text:span> [ⲁ]ⲩⲱ ⲥⲉϩⲩⲡⲟⲧⲁⲥⲥⲉ· <text:line-break/><text:span text:style-name="T1"> </text:span><text:span text:style-name="T2">(30/8) </text:span> [ⲥ]ⲉϣⲟⲟⲡ ⲛ̅〈ⲧ〉ⲟⲛⲟⲙⲁⲥⲓⲁ <text:line-break/><text:span text:style-name="T1"> </text:span><text:span text:style-name="T2">(30/9) </text:span> [ⲛ̅]ⲛ̣̅ⲁⲅⲅⲉⲗⲟⲥ· ⲁⲩⲱ <text:line-break/><text:span text:style-name="T1"> </text:span><text:span text:style-name="T2">(30/10) </text:span> [ⲛ̅ⲥ]ⲩⲙⲫⲱⲛⲟⲛ ⲥⲉϣⲟ‐ <text:line-break/><text:span text:style-name="T1"> </text:span><text:span text:style-name="T2">(30/11) </text:span> [ⲟⲡ ϩ]ⲁⲣⲓ ϩⲁⲣⲁⲩ ⲟⲩⲁⲉⲉⲧⲟⲩ <text:line-break/><text:span text:style-name="T1"> </text:span><text:span text:style-name="T2">(30/12) </text:span> [ⲁⲩ]ⲱ ⲉⲩϣⲃ̅ⲃ{ⲓ}ⲉⲓⲁⲉⲓⲧ {ϥⲣ̅‐ <text:line-break/><text:span text:style-name="T1"> </text:span><text:span text:style-name="T2">(30/13) </text:span> [ϩⲩ]ⲡ̣ⲟⲧⲁⲥⲥⲉ ⲁⲩⲱ} 〈ⲥⲉ〉ⲣ̅ϩⲩ‐ <text:line-break/><text:span text:style-name="T1"> </text:span><text:span text:style-name="T2">(30/14) </text:span> [ⲡ]ⲟⲧⲁⲥⲥⲉ ⲛ̅ⲛ̅ⲛⲟⲩⲧⲉ <text:line-break/><text:span text:style-name="T1"> </text:span><text:span text:style-name="T2">(30/15) </text:span> [ⲉ]ⲑⲏⲡ· ⲁⲃⲁⲗ ϩⲓ̣ⲧⲟⲟⲧϥ̅ ⲛ̅‐ <text:line-break/><text:span text:style-name="T1"> </text:span><text:span text:style-name="T2">(30/16) </text:span> [ⲛ̅ⲟ]ⲩ̣ϣϭⲁⲁϭⲉ̣ ⲙⲛ̅ ⲟⲩ‐ <text:line-break/><text:span text:style-name="T1"> </text:span><text:span text:style-name="T2">(30/17) </text:span> [ⲙ]ⲛ̣̅ⲧⲟⲩⲁϩⲉⲓⲏⲧ· ⲙⲛ̅ ⲟⲩ‐ <text:line-break/><text:span text:style-name="T1"> </text:span><text:span text:style-name="T2">(30/18) </text:span> [ⲕ]ⲁ̣ⲣⲱϥ ⲙⲛ̅ ⲟⲩϩⲟⲣⲙⲏ· <text:line-break/><text:span text:style-name="T1"> </text:span><text:span text:style-name="T2">(30/19) </text:span> [ⲥⲉⲣ̅]ⲕⲁⲗⲉⲓ ⲛ̅ⲛⲁ ⲧⲡⲉϣⲉ ⲛ̣̅‐ <text:line-break/><text:span text:style-name="T1"> </text:span><text:span text:style-name="T2">(30/20) </text:span> [ⲥⲙ]ⲏ̣· ⲛⲉⲉⲓ ⲧⲏⲣⲟⲩ ⲥⲉⲣ̅ <text:line-break/><text:span text:style-name="T1"> </text:span><text:span text:style-name="T2">(30/21) </text:span> [ϩⲩⲡⲟ]ⲧ̣ⲁⲥⲥⲉ ⲙ̅ⲙⲁⲩ ⲛ̅ⲛⲟⲩ‐ <text:line-break/><text:span text:style-name="T1"> </text:span><text:span text:style-name="T2">(30/22) </text:span> [ⲥⲙ]ⲏ̣ ⲛ̅ⲟⲩⲱⲧ· ⲟⲓⲟⲛ ⲙⲟ‐ <text:line-break/><text:span text:style-name="T1"> </text:span><text:span text:style-name="T2">(30/23) </text:span> [ⲛⲟ]ⲛ ⲛⲉⲧⲕⲏⲃ ⲛ̅ⲁⲧϣⲓ‐ <text:line-break/><text:span text:style-name="T1"> </text:span><text:span text:style-name="T2">(30/24) </text:span> [ⲃⲉ ⲉⲩ]ϣⲟⲟⲡ →ϩ←ⲛ ⲛⲁ ⲧⲡⲉ‐ <text:line-break/><text:span text:style-name="T1"> </text:span><text:span text:style-name="T2">(30/25) </text:span> [ϣⲉ ⲛ̅ⲥⲙ]ⲏ· ⲛ̅ⲇⲁⲥⲩ ⲇⲉ <text:line-break/><text:span text:style-name="T1"> </text:span><text:span text:style-name="T2">(30/26) </text:span> [ⲙⲛ̅ ⲙ̅ⲯⲓⲗ]ⲟ̣ⲛ ⲙⲛ̅ ⲛⲉ‐ <text:line-break/><text:span text:style-name="T1"> </text:span><text:span text:style-name="T2">(30/27) </text:span> [ⲧϩⲛ̅ ⲧⲙⲏⲧⲉ ⲥⲉ]ϣⲟⲟⲡ <text:line-break/><text:span text:style-name="T1"> </text:span><text:span text:style-name="T2">(30/28) </text:span> [ⲛ̅ⲛⲉⲧⲉ ⲙⲛ̅ⲧ]ⲟ̣ⲩ ⲥⲙⲏ· ⲡⲁ‐ <text:line-break/><text:span text:style-name="T1"> </text:span><text:span text:style-name="T2">(30/29) </text:span> [ⲗⲓⲛ ... ⲥⲉ]ϭⲗⲙ̅ⲗⲁⲙⲛ̅ⲧ̣ <text:line-break/><text:span text:style-name="T1"> </text:span><text:span text:style-name="T2">(30/30) </text:span> [ⲙⲛ̅ ⲛⲟⲩⲉⲣⲏⲩ· ⲁⲩ]ⲱ̣ ⲥ̣ⲉⲡⲁⲣϫ̅ <text:line-break/><text:span text:style-name="T1"> </text:span><text:span text:style-name="T2">(31/1) </text:span> ⲁⲛⲟⲩⲉⲣⲏ̣[ⲩ] ⲥⲉⲟⲩⲉϩ ⲥ̣ⲁϩ‐ <text:line-break/><text:span text:style-name="T1"> </text:span><text:span text:style-name="T2">(31/2) </text:span> ⲛⲉ ϫⲉ ⲙ̅ⲙⲁⲩ ⲁⲩⲱ ⲥⲉϩⲩ‐ <text:line-break/><text:span text:style-name="T1"> </text:span><text:span text:style-name="T2">(31/3) </text:span> ⲡⲟⲧⲁⲥⲥⲉ· ⲉⲩϣⲟⲟⲡ ⲇⲉ̣ [ⲛ̅]‐ <text:line-break/><text:span text:style-name="T1"> </text:span><text:span text:style-name="T2">(31/4) </text:span> ⲟⲛⲟⲙⲁⲥⲓⲁ ⲛ̅ⲁⲧⲥⲁⲩⲛⲉ <text:line-break/><text:span text:style-name="T1"> </text:span><text:span text:style-name="T2">(31/5) </text:span> ⲥⲉϣⲱⲡⲉ ⲇⲉ ⲛ̅ⲟⲩⲉⲉⲓ ⲏ̣ <text:line-break/><text:span text:style-name="T1"> </text:span><text:span text:style-name="T2">(31/6) </text:span> ⲥⲛⲉⲩ ⲏ ϣⲁⲙⲛ̅ⲧ· ⲏ ϥ[ⲧⲁⲩ] <text:line-break/><text:soft-page-break/><text:span text:style-name="T1"> </text:span><text:span text:style-name="T2">(31/7) </text:span> ⲏ ϯⲟⲩ· ⲏ [ⲥ]ⲁ̣ⲩ ϣⲁϩⲣⲏⲓ̣̈ [ⲁ]‐ <text:line-break/><text:span text:style-name="T1"> </text:span><text:span text:style-name="T2">(31/8) </text:span> ⲥⲁϣϥ̅ ⲉⲟⲩⲛⲧⲟⲩ ⲥⲙⲏ [ⲛ̅]‐ <text:line-break/><text:span text:style-name="T1"> </text:span><text:span text:style-name="T2">(31/9) </text:span> [ϩⲁⲡ]ⲗ̣ⲟⲩⲛ 〈ⲙⲛ̅〉 ⲛⲉⲉⲓ ⲉⲧⲉ ⲟⲩ[ⲛⲧⲟⲩ] <text:line-break/><text:span text:style-name="T1"> </text:span><text:span text:style-name="T2">(31/10) </text:span> [ⲥⲙ]ⲏ ⲥⲛ̅ⲧ̣[ⲉ] ⲛ̣̅. ⲡⲙⲁ [ⲙ̅ⲡⲙⲛ̅ⲧ]‐ <text:line-break/><text:span text:style-name="T1"> </text:span><text:span text:style-name="T2">(31/11) </text:span> ⲥ̣ⲁ̣ϣϥ ⲉ[ⲧⲣ̅ⲥⲩ]ⲙⲫ[ⲱⲛⲓ· ϩⲛ̅] <text:line-break/><text:span text:style-name="T1"> </text:span><text:span text:style-name="T2">(31/12) </text:span> ⲛ̣̅ϣⲁⲣⲡ̅ ⲛ̅ⲣⲉⲛ ϩⲛ̣̅[ϩⲁⲉⲓ]‐ <text:line-break/><text:span text:style-name="T1"> </text:span><text:span text:style-name="T2">(31/13) </text:span> ⲛⲉ· ⲥⲉϭ[ⲁϫ]ⲃ̅· ⲁⲩⲱ ⲛ[ⲉⲉⲓ] <text:line-break/><text:span text:style-name="T1"> </text:span><text:span text:style-name="T2">(31/14) </text:span> ϩⲱⲥ ⲉⲙ̣[ⲛ̅]ⲧ̣ⲟⲩ ⲟⲩⲥⲓⲁ [ⲙ̅]‐ <text:line-break/><text:span text:style-name="T1"> </text:span><text:span text:style-name="T2">(31/15) </text:span> [ⲙ]ⲉⲩ ⲏ ⲉ̣[ⲩⲟ]ⲉⲓ ⲛ̅ⲉⲓⲛⲉ [ⲛ̅]‐ <text:line-break/><text:span text:style-name="T1"> </text:span><text:span text:style-name="T2">(31/16) </text:span> [ⲧ]ⲟⲩⲥⲓⲁ [ⲏ] ⲉ̣ⲩ̣ⲡⲱⲣ[ϫ̅ ⲁ]‐ <text:line-break/><text:span text:style-name="T1"> </text:span><text:span text:style-name="T2">(31/17) </text:span> ⲧⲫⲩⲥⲓⲥ [ⲙ̅]ⲡ̣ⲛⲟ̣ⲩⲥ̣ [ⲧⲏ ⲉ]‐ <text:line-break/><text:span text:style-name="T1"> </text:span><text:span text:style-name="T2">(31/18) </text:span> ⲧⲉ ⲑⲁⲩ[ⲧ ⲧⲉ] ⲉ̣ⲧϩⲛ̅ ⲧⲙ[ⲏⲧⲉ] <text:line-break/><text:span text:style-name="T1"> </text:span><text:span text:style-name="T2">(31/19) </text:span> ⲁⲩⲱ ⲉⲕ̣ⲉ̣[ⲓ]ⲛ̣ⲉ ⲁϩⲟⲩⲛ̣ [ⲛ̅]‐ <text:line-break/><text:span text:style-name="T1"> </text:span><text:span text:style-name="T2">(31/20) </text:span> ⲛⲉϯⲛⲉ ⲛ̅ⲛⲟⲩⲉⲣ[ⲏⲩ ⲙⲛ̅] <text:line-break/><text:span text:style-name="T1"> </text:span><text:span text:style-name="T2">(31/21) </text:span> ⲛⲉⲧⲉ ⲟⲩⲛⲧⲟⲩ ⲥⲙⲏ [ⲙⲛ̅] <text:line-break/><text:span text:style-name="T1"> </text:span><text:span text:style-name="T2">(31/22) </text:span> ⲛⲉⲧⲣ̅ⲥⲩⲙⲫⲱⲛⲓ ϩⲛ̣̅[ϩⲁ]‐ <text:line-break/><text:span text:style-name="T1"> </text:span><text:span text:style-name="T2">(31/23) </text:span> ⲉⲓⲛⲉ ⲙⲉⲛ· ⲃ̅ⲁ̅ⲅ̅ⲁ̅ⲇ̣̅̅[̅ⲁ̅]̅ⲍ̣̅̅[̅ⲁ̅ⲑ̅ⲁ̅] <text:line-break/><text:span text:style-name="T1"> </text:span><text:span text:style-name="T2">(31/24) </text:span> ⲃ̅ⲉ̅ⲅ̅ⲉ̅ⲇ̅ⲉ̅ⲍ̣̅̅[̅ⲉ̅]̅ⲑ̣̅̅ⲉ̣̅̅ [ⲃ̅ⲏⲅⲏⲇⲏ̅ <text:line-break/><text:span text:style-name="T1"> </text:span><text:span text:style-name="T2">(31/25) </text:span> ⲍⲏ̅ⲑ̅ⲏ̅· ⲃ̣[ⲓ̅ⲅⲓⲇⲓⲍⲓⲑⲓ̅· ⲃ̅ⲟⲅⲟ̅] <text:line-break/><text:span text:style-name="T1"> </text:span><text:span text:style-name="T2">(31/26) </text:span> ⲇⲟ̅ⲍ̅ⲟ̅ⲑ̅ⲟ̣̅̅ [ⲃ̅ⲩⲅⲩⲇⲩⲍⲩⲑⲩ̅] <text:line-break/><text:span text:style-name="T1"> </text:span><text:span text:style-name="T2">(31/27) </text:span> ⲃⲱ̅ⲅ̅ⲱ̅ⲇ̅ⲱ̣̅̅[̅ⲍ̅ⲱ̅ⲑ̅ⲱ̅· ⲁⲩⲱ] <text:line-break/><text:span text:style-name="T1"> </text:span><text:span text:style-name="T2">(31/28) </text:span> ⲡⲕⲉⲥⲉ[ⲉⲡⲉ <text:line-break/><text:span text:style-name="T1"> </text:span><text:span text:style-name="T2">(31/29) </text:span> ⲃ̅ⲁ̅[̅ⲃ̅ⲉ̅ⲃ̅ⲏ̅ⲃ̅ⲓ̅ⲃ̅ⲟ̅ⲃ̅ⲩ̅ⲃ̅ⲱ̅·] <text:line-break/><text:span text:style-name="T1"> </text:span><text:span text:style-name="T2">(32/1) </text:span> ⲡⲉⲕⲉⲥⲉⲉⲡⲉ ⲇ̣ⲉ ⲉⲩϣⲟⲟⲡ <text:line-break/><text:span text:style-name="T1"> </text:span><text:span text:style-name="T2">(32/2) </text:span> ϩⲛ̅ ⲟⲩϣⲃ̅ⲃⲓⲉ· ⲁⲃ̅ⲉ̅ⲃ̅ⲏ̅ⲃ̅ⲓ̅ <text:line-break/><text:span text:style-name="T1"> </text:span><text:span text:style-name="T2">(32/3) </text:span> [ⲃ̅]̅ⲟ̅ⲃ̅ ϫⲉⲕⲁⲥⲉ ⲉⲕⲛⲁⲥⲁⲩ‐ <text:line-break/><text:span text:style-name="T1"> </text:span><text:span text:style-name="T2">(32/4) </text:span> [ϩ]ⲟⲩ· ⲁⲩⲱ ⲛⲕⲡⲱⲣϫ̅ ⲁⲛ̅ <text:line-break/><text:span text:style-name="T1"> </text:span><text:span text:style-name="T2">(32/5) </text:span> [ⲁ]ⲅⲅⲉⲗⲟⲥ ⲁⲩⲱ ⲟⲩⲛ ϩⲛ̅ <text:line-break/><text:span text:style-name="T1"> </text:span><text:span text:style-name="T2">(32/6) </text:span> [ⲁ]ⲡⲟⲧⲉⲗ̣ⲉ̣ⲥ̣ⲧ̣ⲓⲕⲟⲛ ⲛ̣ⲁ‐ <text:line-break/><text:span text:style-name="T1"> </text:span><text:span text:style-name="T2">(32/7) </text:span> ϣ̣ⲱⲡⲉ ⲧⲉ[ϩ]ⲟ̣ⲩⲉⲓⲧⲉ ⲙⲉⲛ <text:line-break/><text:span text:style-name="T1"> </text:span><text:span text:style-name="T2">(32/8) </text:span> [ⲉ]ⲧⲛⲁⲛⲟⲩⲥ ⲟ̣ⲩⲁⲃⲁⲗ ϩⲙ̅ <text:line-break/><text:span text:style-name="T1"> </text:span><text:span text:style-name="T2">(32/9) </text:span> [ⲡϣ]ⲁ̣ⲙⲛ̅ⲧ ⲧⲉ· ⲥⲡ[...]ⲉ̣ <text:line-break/><text:span text:style-name="T1"> </text:span><text:span text:style-name="T2">(32/10) </text:span> [...].ⲣ̅ ⲭⲣ̣ⲉ̣ⲓ̣[ⲁ] ⲙ̅ⲡ.[ <text:line-break/><text:span text:style-name="T1"> </text:span><text:span text:style-name="T2">(32/11) </text:span> [.....]ⲁ[...]ⲁϩⲧⲉ[ <text:line-break/><text:span text:style-name="T1"> </text:span><text:span text:style-name="T2">(32/12) </text:span> [....] ⲛⲟⲩⲥⲭ̣ⲏⲙⲁ· 〈ⲧ〉ⲇⲩ <text:line-break/><text:span text:style-name="T1"> </text:span><text:span text:style-name="T2">(32/13) </text:span> [ⲁⲥ] ⲇⲉ ⲙⲛ̅ ⲧⲙ̣ⲟⲛⲁⲥ ⲥⲉ‐ <text:line-break/><text:span text:style-name="T1"> </text:span><text:span text:style-name="T2">(32/14) </text:span> [ⲧ]ⲛ̣̅ⲧⲱⲛ ⲉⲛ [ⲛ̅ⲗ]ⲁⲁⲩⲉ· ⲁⲗ‐ <text:line-break/><text:span text:style-name="T1"> </text:span><text:span text:style-name="T2">(32/15) </text:span> [ⲗ]ⲁ̣ ⲉⲩϣⲟⲟ[ⲡ ⲛ̅]ϩⲟⲩⲉⲓ <text:line-break/><text:span text:style-name="T1"> </text:span><text:span text:style-name="T2">(32/16) </text:span> [ⲧⲉ] ⲧ̣ⲇⲩⲁⲥ̣ [ⲙⲉ]ⲛ ⲉⲥⲡ̣[ⲁ]‐ <text:line-break/><text:span text:style-name="T1"> </text:span><text:span text:style-name="T2">(32/17) </text:span> [ⲣϫ̅] ⲥ̣ⲡ̣ⲁ̣ⲣϫ̣̅ [ⲁⲧ]ⲙ̣ⲟⲛⲁⲥ ⲁ̣[ⲩ]‐ <text:line-break/><text:span text:style-name="T1"> </text:span><text:span text:style-name="T2">(32/18) </text:span> [ⲱ ⲥ]ⲏⲡ̣ ⲁⲑ[ⲩⲡ]ⲟ̣ⲥⲧⲁⲥⲓⲥ̣ <text:line-break/><text:span text:style-name="T1"> </text:span><text:span text:style-name="T2">(32/19) </text:span> [ⲡ]ⲉ̣ϥⲧⲁⲩ ⲇ[ⲉ ⲁϥ]ϫⲓ ⲥⲧⲟⲓ‐ <text:line-break/><text:span text:style-name="T1"> </text:span><text:span text:style-name="T2">(32/20) </text:span> [ⲭⲉⲓ]ⲟ̣ⲛ· ⲁⲩ〈ⲱ〉 ⲡⲙⲁϩϯⲟⲩ <text:line-break/><text:span text:style-name="T1"> </text:span><text:span text:style-name="T2">(32/21) </text:span> [ⲁϥ]ϫⲓ ⲙ̅ⲡⲧⲱⲧ· ⲡⲙⲁϩ‐ <text:line-break/><text:span text:style-name="T1"> </text:span><text:span text:style-name="T2">(32/22) </text:span> [ⲥⲁ]ⲩ ⲁϥϫⲱⲕ ⲁⲃⲁⲗ· ϩⲓⲧⲟ‐ <text:line-break/><text:span text:style-name="T1"> </text:span><text:span text:style-name="T2">(32/23) </text:span> [ⲟⲧ]ϥ̣̅ ⲟⲩⲁⲉⲉⲧϥ̅· ⲡⲙⲁϩ‐ <text:line-break/><text:span text:style-name="T1"> </text:span><text:span text:style-name="T2">(32/24) </text:span> [ⲥⲁϣϥ̅ ⲇ]ⲉ ⲁϥ̣ϫⲓ ⲥⲁⲁⲉⲓⲉ· <text:line-break/><text:soft-page-break/><text:span text:style-name="T1"> </text:span><text:span text:style-name="T2">(32/25) </text:span> [ⲁⲩⲱ ⲡⲙⲁϩ]ϣ̣ⲙⲟⲩⲛ ⲁϥ‐ <text:line-break/><text:span text:style-name="T1"> </text:span><text:span text:style-name="T2">(32/26) </text:span> [ϫⲓ 8+- ]ⲣⲏⲩ ⲁ <text:line-break/><text:span text:style-name="T1"> </text:span><text:span text:style-name="T2">(32/27) </text:span> [ 9+- ⲥ]ⲃ̣̅ⲧⲱⲧ· <text:line-break/><text:span text:style-name="T1"> </text:span><text:span text:style-name="T2">(32/28) </text:span> [ 10+- ]ⲧ̣ ϥⲧⲁ <text:line-break/><text:span text:style-name="T1"> </text:span><text:span text:style-name="T2">(32/29) </text:span> [ 10+- ]ⲟⲩϩⲟⲩⲟ· <text:line-break/><text:span text:style-name="T1"> </text:span><text:span text:style-name="T2">(33/1) </text:span> ⲁ̣ⲩⲱ ⲡⲙ[ⲁϩ]ⲙ̣ⲏ̣ⲧ̣ ⲁ[ϥϭⲁⲗⲡ] <text:line-break/><text:span text:style-name="T1"> </text:span><text:span text:style-name="T2">(33/2) </text:span> ⲡⲙⲁ ⲧⲏⲣϥ̅ ⲁⲃⲁⲗ· ⲡ[ⲙⲁϩ]‐ <text:line-break/><text:span text:style-name="T1"> </text:span><text:span text:style-name="T2">(33/3) </text:span> ⲙⲛ̅ⲧⲟⲩⲏ ⲇⲉ ⲙⲛ̅ ⲡⲙ̣[ⲁϩ]‐ <text:line-break/><text:span text:style-name="T1"> </text:span><text:span text:style-name="T2">(33/4) </text:span> ⲙ[ⲛ̅ⲧⲥ]ⲛⲁ̣ⲩⲥ ⲁⲩϫⲓⲟⲟ[ⲣ <text:line-break/><text:span text:style-name="T1"> </text:span><text:span text:style-name="T2">(33/5) </text:span> [..]ⲛⲁⲡ[..] ⲉⲙ[ⲛ̅]ⲧⲟ̣[ⲩ...ⲙ̅ⲙ] <text:line-break/><text:span text:style-name="T1"> </text:span><text:span text:style-name="T2">(33/6) </text:span> [ⲉ]ⲩ ϥϫⲁ[ⲥⲓ....]ⲡⲙ[ <text:line-break/><text:span text:style-name="T1"> </text:span><text:span text:style-name="T2">(33/7) </text:span> [ⲥ]ⲁϣϥ ⲉ[ⲧⲉ...]ⲧⲉϥ̣ [ <text:line-break/><text:span text:style-name="T1"> </text:span><text:span text:style-name="T2">(33/8) </text:span> [...] ⲙ̅ⲙ̣[ⲉⲩ <text:line-break/><text:span text:style-name="T1"> </text:span><text:span text:style-name="T2">(33/9) </text:span> (1 line missing) <text:line-break/><text:span text:style-name="T1"> </text:span><text:span text:style-name="T2">(33/10) </text:span> [.].[ <text:line-break/><text:span text:style-name="T1"> </text:span><text:span text:style-name="T2">(33/11) </text:span> ⲙⲉⲩ[ <text:line-break/><text:span text:style-name="T1"> </text:span><text:span text:style-name="T2">(33/12) </text:span> ⲁ̣ⲃ̣ⲁⲗ ϩ[ⲛ̅ <text:line-break/><text:span text:style-name="T1"> </text:span><text:span text:style-name="T2">(33/13) </text:span> [...]ⲛ.[ <text:line-break/><text:span text:style-name="T1"> </text:span><text:span text:style-name="T2">(33/14) </text:span> [.]ⲗⲟⲥ[ <text:line-break/><text:span text:style-name="T1"> </text:span><text:span text:style-name="T2">(33/15) </text:span> [ⲣ]ⲉ̣ⲛ ⲙ̅[ <text:line-break/><text:span text:style-name="T1"> </text:span><text:span text:style-name="T2">(33/16) </text:span> ⲟⲧϥ̅ [ <text:line-break/><text:span text:style-name="T1"> </text:span><text:span text:style-name="T2">(33/17) </text:span> ⲉ̣ⲣⲏⲧ ϫ̣[ⲉ...]ⲁⲓⲣ[...ⲣ̅] <text:line-break/><text:span text:style-name="T1"> </text:span><text:span text:style-name="T2">(33/18) </text:span> ⲁⲣⲭⲉⲥⲑ̣[ⲁⲓ ⲁ]ⲣ̅ⲁⲡ̣[ⲟⲭⲱ] <text:line-break/><text:span text:style-name="T1"> </text:span><text:span text:style-name="T2">(33/19) </text:span> ⲣⲓ〈ⲍⲉ〉 ⲙ̅ⲙⲁⲩ· ⲁⲃⲁⲗ ϩ[ⲓⲧⲟⲟ]‐ <text:line-break/><text:span text:style-name="T1"> </text:span><text:span text:style-name="T2">(33/20) </text:span> ⲧϥ̅ ⲛ̅ⲛⲟⲩⲙⲁⲉⲓ̣ⲛ̣ [ⲙⲛ̅] <text:line-break/><text:span text:style-name="T1"> </text:span><text:span text:style-name="T2">(33/21) </text:span> ⲟⲩⲥⲧⲓⲅⲙⲏ· ⲙ̅ⲡⲉ̣[ⲧϯ]‐ <text:line-break/><text:span text:style-name="T1"> </text:span><text:span text:style-name="T2">(33/22) </text:span> ⲧⲱⲛ ⲙⲛ̅ ⲡⲉⲧⲟⲉⲓ ⲛ̣̅[ϫⲁ]‐ <text:line-break/><text:span text:style-name="T1"> </text:span><text:span text:style-name="T2">(33/23) </text:span> ϫⲉ· ⲧⲉⲉⲓ̣ [ⲧⲉ] ⲑⲉ̣ [ <text:line-break/><text:span text:style-name="T1"> </text:span><text:span text:style-name="T2">(33/24) </text:span> ⲛ̅ⲧⲟⲩⲥⲓⲁ̣ [ <text:line-break/><text:span text:style-name="T1"> </text:span><text:span text:style-name="T2">(33/25) </text:span> ⲃⲁⲗ ⲛⲉ[ <text:line-break/><text:span text:style-name="T1"> </text:span><text:span text:style-name="T2">(33/26) </text:span> ⲛ̅ⲛ̅ⲥⲧⲟ[ⲓⲭⲓⲟⲛ <text:line-break/><text:span text:style-name="T1"> </text:span><text:span text:style-name="T2">(33/27) </text:span> ⲇⲉ ϩⲛ̅ ⲟ̣[ⲩ <text:line-break/><text:span text:style-name="T1"> </text:span><text:span text:style-name="T2">(34/1) </text:span> [ⲟⲩⲁ]ⲁⲃ ⲏ ⲕⲁ̣ⲧⲁ ⲟⲩϩⲱ‐ <text:line-break/><text:span text:style-name="T1"> </text:span><text:span text:style-name="T2">(34/2) </text:span> [ⲧⲡ̅] ⲉϥ→ϣ←ⲟⲟⲡ ϩⲁⲣⲓϩⲁⲣⲁ〈ϥ〉· <text:line-break/><text:span text:style-name="T1"> </text:span><text:span text:style-name="T2">(34/3) </text:span> [ⲁⲩ]ⲱ ⲉ〈ⲩ〉ϣⲟⲟⲡ ϣⲁ̣ ⲛⲟⲩ <text:line-break/><text:span text:style-name="T1"> </text:span><text:span text:style-name="T2">(34/4) </text:span> [ⲉⲣⲏ]ⲩ ϩⲛ̅ ⲟⲩϫⲡⲟ ⲏ̣ [ϩⲛ̅] ⲟⲩ‐ <text:line-break/><text:span text:style-name="T1"> </text:span><text:span text:style-name="T2">(34/5) </text:span> [ⲙⲉⲥ]ⲧ̣ⲟⲩ [ⲁⲩ]ⲱ̣ ⲕⲁⲧ̣[ⲁ <text:line-break/><text:span text:style-name="T1"> </text:span><text:span text:style-name="T2">(34/6) </text:span> [...]ϫⲡ[ⲟ....]ⲙⲛ̅ⲧⲉⲩ <text:line-break/><text:span text:style-name="T1"> </text:span><text:span text:style-name="T2">(34/7) </text:span> [...].[......]ⲱ· ⲛⲉⲉ̣[ⲓ <text:line-break/><text:span text:style-name="T1"> </text:span><text:span text:style-name="T2">(34/8) </text:span> [ 10+- ]ⲉ̣ⲩ.[ <text:line-break/><text:span text:style-name="T1"> </text:span><text:span text:style-name="T2">(34/9) </text:span> (2 lines missing) <text:line-break/><text:span text:style-name="T1"> </text:span><text:span text:style-name="T2">(34/11) </text:span> [ 12+- ]ⲙⲁ <text:line-break/><text:span text:style-name="T1"> </text:span><text:span text:style-name="T2">(34/12) </text:span> [ 10+- ]ⲟⲩⲁⲧ <text:line-break/><text:span text:style-name="T1"> </text:span><text:span text:style-name="T2">(34/13) </text:span> [ 10+- ]ϣⲟ[ <text:line-break/><text:span text:style-name="T1"> </text:span><text:span text:style-name="T2">(34/14) </text:span> [ 11+- ]ⲧⲟⲛ[ <text:line-break/><text:span text:style-name="T1"> </text:span><text:span text:style-name="T2">(34/15) </text:span> [ 10+- ]ⲉ̣ⲗⲟⲥ .[ <text:line-break/><text:span text:style-name="T1"> </text:span><text:span text:style-name="T2">(34/16) </text:span> [ 10+- ]ⲉⲩ ⲙ̅[ <text:line-break/><text:soft-page-break/><text:span text:style-name="T1"> </text:span><text:span text:style-name="T2">(34/17) </text:span> [.....]ⲛ[.....].[.].ⲉ[ <text:line-break/><text:span text:style-name="T1"> </text:span><text:span text:style-name="T2">(34/18) </text:span> [...ⲟ]ⲩⲉⲉⲓ̣ [..ⲉ]ϥ̣ϫⲟⲩ ⲙ̅‐ <text:line-break/><text:span text:style-name="T1"> </text:span><text:span text:style-name="T2">(34/19) </text:span> [ⲡⲁⲓ]ⲛⲓⲅⲙⲁ̣ ⲟ̣[ⲓ]ⲟⲛ ⲛ̅ϩⲣⲏ‐ <text:line-break/><text:span text:style-name="T1"> </text:span><text:span text:style-name="T2">(34/20) </text:span> [ⲓ̈ ϩⲙ̅ ⲡ]ⲁ̣ⲓⲥⲑⲏⲧⲟⲥ ⲕⲟⲥⲙⲟⲥ <text:line-break/><text:span text:style-name="T1"> </text:span><text:span text:style-name="T2">(34/21) </text:span> [ⲉϥϣ]ⲟⲟⲡ ⲛ̅ϭⲓ ⲡⲣ̅ⲡⲉⲉⲓ <text:line-break/><text:span text:style-name="T1"> </text:span><text:span text:style-name="T2">(34/22) </text:span> [ⲉⲧⲉⲓ]ⲣⲉ ⲛ̅ⲥⲁϣϥ̅ ⲛ̅ϣⲉ ⲙ̅‐ <text:line-break/><text:span text:style-name="T1"> </text:span><text:span text:style-name="T2">(34/23) </text:span> [ⲙⲁϩⲉ] ⲁⲩⲱ ⲟⲩⲉⲓ〈ⲉ〉ⲣⲟ ⲉϥ <text:line-break/><text:span text:style-name="T1"> </text:span><text:span text:style-name="T2">(34/24) </text:span> [......]..[.]ⲡ̣· ⲛ̅ϩⲣⲏⲓ̈ <text:line-break/><text:span text:style-name="T1"> </text:span><text:span text:style-name="T2">(34/25) </text:span> [......ϣⲁ ⲁ]ⲛ̣ⲏϩⲉ ⲉⲩ <text:line-break/><text:span text:style-name="T1"> </text:span><text:span text:style-name="T2">(34/26) </text:span> [ 9+- ]ϣⲁⲙⲛ̅ⲧ <text:line-break/><text:span text:style-name="T1"> </text:span><text:span text:style-name="T2">(34/27) </text:span> [ 9+- ] ⲁⲡϥⲧⲁⲩ <text:line-break/><text:span text:style-name="T1"> </text:span><text:span text:style-name="T2">(34/28) </text:span> [ 7+- ⲥⲫ]ⲣ̣ⲁⲅⲓⲥ ⲛ̅ <text:line-break/><text:span text:style-name="T1"> </text:span><text:span text:style-name="T2">(34/29) </text:span> [ 10+- ]ⲛ̣̅ⲕⲗⲟⲟⲗⲉ· <text:line-break/><text:span text:style-name="T1"> </text:span><text:span text:style-name="T2">(35/1) </text:span> [ⲙⲛ̅ ⲙ]ⲙⲟⲩⲉⲓⲏ· ⲙⲛ̅ ⲛⲉⲓ‐ <text:line-break/><text:span text:style-name="T1"> </text:span><text:span text:style-name="T2">(35/2) </text:span> [ⲛⲉ ⲛ̅ⲛ̅]ⲥⲙⲁⲧ ⲙ̅ⲙⲟⲩⲗϩ <text:line-break/><text:span text:style-name="T1"> </text:span><text:span text:style-name="T2">(35/3) </text:span> [ⲙⲛ̅] ϩⲛ̅ⲉⲓⲛⲉ ⲛ̅ⲥⲙⲁⲣⲁⲅⲇ‐ <text:line-break/><text:span text:style-name="T1"> </text:span><text:span text:style-name="T2">(35/4) </text:span> [ⲓⲛⲟⲥ] ⲡⲕⲉⲥⲉⲉⲡⲉ ϯⲛⲁ‐ <text:line-break/><text:span text:style-name="T1"> </text:span><text:span text:style-name="T2">(35/5) </text:span> [ⲧⲥ]ⲉⲃⲁ[ⲕ] ⲁⲣⲁⲩ· ⲡⲉⲉⲓ ⲡⲉ <text:line-break/><text:span text:style-name="T1"> </text:span><text:span text:style-name="T2">(35/6) </text:span> [ⲡ]ϫⲡⲟ [ⲛ̅ⲛ̅]ⲣⲉⲛ· ⲧⲉⲧⲉ ⲙ̅[ⲡⲟⲩ] <text:line-break/><text:span text:style-name="T1"> </text:span><text:span text:style-name="T2">(35/7) </text:span> ϫⲡⲁⲥ [......]..[.ϫⲓⲛ ⲛ̅]‐ <text:line-break/><text:span text:style-name="T1"> </text:span><text:span text:style-name="T2">(35/8) </text:span> ϣ̣ⲁⲣⲡ̅ [ <text:line-break/><text:span text:style-name="T1"> </text:span><text:span text:style-name="T2">(35/9) </text:span> (2 lines missing) <text:line-break/><text:span text:style-name="T1"> </text:span><text:span text:style-name="T2">(35/11) </text:span> [.].ⲏ[ <text:line-break/><text:span text:style-name="T1"> </text:span><text:span text:style-name="T2">(35/12) </text:span> [.]ⲙ̣̅ⲙ.[ <text:line-break/><text:span text:style-name="T1"> </text:span><text:span text:style-name="T2">(35/13) </text:span> [.].ϣⲁ̣[ <text:line-break/><text:span text:style-name="T1"> </text:span><text:span text:style-name="T2">(35/14) </text:span> [.]ϣⲟ[ <text:line-break/><text:span text:style-name="T1"> </text:span><text:span text:style-name="T2">(35/15) </text:span> ⲉⲧⲃⲉ[ <text:line-break/><text:span text:style-name="T1"> </text:span><text:span text:style-name="T2">(35/16) </text:span> ⲧ̣ⲁϩⲉ[ <text:line-break/><text:span text:style-name="T1"> </text:span><text:span text:style-name="T2">(35/17) </text:span> ⲇⲉ [.....]ϣ̣ⲁ̣...[ <text:line-break/><text:span text:style-name="T1"> </text:span><text:span text:style-name="T2">(35/18) </text:span> ⲥⲁⲡ ϩⲱ̣[ⲥ ⲉϥ]ⲁ̣ⲧⲡ̅ ϩⲱⲥ <text:line-break/><text:span text:style-name="T1"> </text:span><text:span text:style-name="T2">(35/19) </text:span> ⲉϥϣⲏϣ ϩ̣ⲱⲥ ⲉϥϭ[ⲁϫⲃ̅·] <text:line-break/><text:span text:style-name="T1"> </text:span><text:span text:style-name="T2">(35/20) </text:span> ϥϣⲟⲟⲡ ⲇⲉ ⲛ̅ϭⲓ ⲡⲗ[ⲟⲅⲟⲥ] <text:line-break/><text:span text:style-name="T1"> </text:span><text:span text:style-name="T2">(35/21) </text:span> ⲛⲣⲙ̅ⲣⲉϣϥ̅· ⲟⲩⲛ ⲕⲉ[ⲗⲟ]‐ <text:line-break/><text:span text:style-name="T1"> </text:span><text:span text:style-name="T2">(35/22) </text:span> ⲅⲟⲥ ⲇⲉ ϣⲟ̣ⲟⲡ ⲉϥϩ[ⲏⲛ] <text:line-break/><text:span text:style-name="T1"> </text:span><text:span text:style-name="T2">(35/23) </text:span> ⲁϩⲟⲩⲛ ⲁⲧⲟⲩⲥⲓ̣[ⲁ <text:line-break/><text:span text:style-name="T1"> </text:span><text:span text:style-name="T2">(35/24) </text:span> ϩⲉ ⲛ̅ⲧⲉⲉⲓⲙ̣[ⲓ]ⲛ̣ⲉ̣ [ <text:line-break/><text:span text:style-name="T1"> </text:span><text:span text:style-name="T2">(35/25) </text:span> ϫⲉ ⲁⲡⲉ[ <text:line-break/><text:span text:style-name="T1"> </text:span><text:span text:style-name="T2">(35/26) </text:span> ⲁⲩⲱ ϥⲟⲩ[ <text:line-break/><text:span text:style-name="T1"> </text:span><text:span text:style-name="T2">(35/27) </text:span> ⲧⲇⲓⲁⲫⲟ̣ⲣ̣[ⲁ <text:line-break/><text:span text:style-name="T1"> </text:span><text:span text:style-name="T2">(35/28) </text:span> ⲙⲛ̅ ⲡ̣[ <text:line-break/><text:span text:style-name="T1"> </text:span><text:span text:style-name="T2">(36/1) </text:span> ⲙ̅ⲡⲧⲏⲣϥ̅ ⲙⲛ̣̅ ⲟ̣ⲩ̣[ <text:line-break/><text:span text:style-name="T1"> </text:span><text:span text:style-name="T2">(36/2) </text:span> ⲛ̅ⲛⲟⲩⲥⲓⲁ ⲛ̅ⲁⲧⲡ[ⲱϣⲉ <text:line-break/><text:span text:style-name="T1"> </text:span><text:span text:style-name="T2">(36/3) </text:span> ⲁⲩⲱ ⲧⲇⲩⲛⲁⲙⲓⲥ ⲉ[ <text:line-break/><text:span text:style-name="T1"> </text:span><text:span text:style-name="T2">(36/4) </text:span> ⲉⲩⲛ̅ⲧⲉⲥ ⲙ̅ⲙⲉⲩ ⲛ̣̅[ⲟⲩ]‐ <text:line-break/><text:span text:style-name="T1"> </text:span><text:span text:style-name="T2">(36/5) </text:span> ⲕⲟⲓⲛⲱⲛⲓⲁ ⲁ̣[ⲡ]ⲟ̣ⲩ̣ⲛ̣[ⲁϥ] <text:line-break/><text:span text:style-name="T1"> </text:span><text:span text:style-name="T2">(36/6) </text:span> [ϩ]ⲛ̅ ⲟⲩⲡ̣ⲣ̣ⲁϫ ⲙ̣ⲛ̅ ⲟ[ⲩ <text:line-break/><text:span text:style-name="T1"> </text:span><text:span text:style-name="T2">(36/7) </text:span> [ +-9 ]ⲓ̣ⲟ ⲉⲓⲧ̣[ⲉ <text:line-break/><text:soft-page-break/><text:span text:style-name="T1"> </text:span><text:span text:style-name="T2">(36/8) </text:span> [ +-10 ]ⲱ̣ⲙ.[ <text:line-break/><text:span text:style-name="T1"> </text:span><text:span text:style-name="T2">(36/9) </text:span> (2 lines missing) <text:line-break/><text:span text:style-name="T1"> </text:span><text:span text:style-name="T2">(36/12) </text:span> [ +-11 ]ⲉ̣· .[ <text:line-break/><text:span text:style-name="T1"> </text:span><text:span text:style-name="T2">(36/13) </text:span> [ +-10 ]ⲛ̣̅ⲧⲟⲩ[ <text:line-break/><text:span text:style-name="T1"> </text:span><text:span text:style-name="T2">(36/14) </text:span> [ +-10 ]ⲉ ⲟⲩ[ <text:line-break/><text:span text:style-name="T1"> </text:span><text:span text:style-name="T2">(36/15) </text:span> [ +-10 ]ⲙⲁ[ <text:line-break/><text:span text:style-name="T1"> </text:span><text:span text:style-name="T2">(36/16) </text:span> [ +-10 ]ⲛ ϭⲁⲙ̣ <text:line-break/><text:span text:style-name="T1"> </text:span><text:span text:style-name="T2">(36/17) </text:span> [ +-7 ⲉϥ]ϣⲟⲟ[ⲡ] <text:line-break/><text:span text:style-name="T1"> </text:span><text:span text:style-name="T2">(36/18) </text:span> [ϩⲙ̅] ⲙⲁ̣ ⲛⲓⲙ [.....]ⲱ̣ⲙ[ <text:line-break/><text:span text:style-name="T1"> </text:span><text:span text:style-name="T2">(36/19) </text:span> [..] ⲙ̅ⲙⲁⲩ [ⲛ̅ⲟⲩ]ⲁ̣ⲉⲓϣ ⲛⲓ̣ⲙ̣ <text:line-break/><text:span text:style-name="T1"> </text:span><text:span text:style-name="T2">(36/20) </text:span> [ⲉϥ]ϣⲟⲟⲡ ⲙⲛ̅ ⲛ̅ⲥⲱⲙⲁ‐ <text:line-break/><text:span text:style-name="T1"> </text:span><text:span text:style-name="T2">(36/21) </text:span> [ⲧⲓ]ⲕ̣ⲟⲛ ⲙⲛ̅ ⲛⲁⲧⲥⲱⲙⲁ <text:line-break/><text:span text:style-name="T1"> </text:span><text:span text:style-name="T2">(36/22) </text:span> [ⲡ]ⲉ̣ⲉⲓ ⲡⲉ ⲡϣⲉϫⲉ ⲛ̅ⲛ̅ϩⲩ‐ <text:line-break/><text:span text:style-name="T1"> </text:span><text:span text:style-name="T2">(36/23) </text:span> [ⲡⲟⲥ]ⲧ̣ⲁⲥⲓⲥ ⲁⲧⲣⲉ ⲟⲩⲉⲉⲓ <text:line-break/><text:span text:style-name="T1"> </text:span><text:span text:style-name="T2">(36/24) </text:span> [....] ⲛ̅ⲧⲉⲉⲓϩⲉ· ⲉⲓϣϫⲉ <text:line-break/><text:span text:style-name="T1"> </text:span><text:span text:style-name="T2">(36/25) </text:span> [.....]ⲉ̣ⲁ̣.ⲉⲛ ⲙⲛ̅ ⲛⲟⲩ <text:line-break/><text:span text:style-name="T1"> </text:span><text:span text:style-name="T2">(36/26) </text:span> [ 9+- ]ⲉ ⲉϥⲣ̅ⲃⲟⲏ̣‐ <text:line-break/><text:span text:style-name="T1"> </text:span><text:span text:style-name="T2">(36/27) </text:span> [ⲑⲓ ⲛ̅ⲛⲉⲧⲣ̅ⲧ]ⲁ̣ⲣⲁⲥⲥⲉ ⲛⲙ̅ <text:line-break/><text:span text:style-name="T1"> </text:span><text:span text:style-name="T2">(36/28) </text:span> [ 7+- ]ⲟⲩⲁⲛϩ ⲁⲃⲁ[ⲗ] <text:line-break/><text:span text:style-name="T1"> </text:span><text:span text:style-name="T2">(36/29) </text:span> [ 8+- ⲉⲣ]ⲉϣⲁⲟⲩ <text:line-break/><text:span text:style-name="T1"> </text:span><text:span text:style-name="T2">(37/1) </text:span> [ⲉ]ⲉⲓ ⲥⲟⲩⲱⲱⲛϥ̅ ϥⲛⲁ‐ <text:line-break/><text:span text:style-name="T1"> </text:span><text:span text:style-name="T2">(37/2) </text:span> [ⲙ]ⲟⲩⲧⲉ ⲁⲣⲁϥ· ⲟⲩⲛ ϩⲛ̅‐ <text:line-break/><text:span text:style-name="T1"> </text:span><text:span text:style-name="T2">(37/3) </text:span> [ϣ]ⲉϫⲉ ⲇⲉ ϣⲟⲟⲡ ϩⲁⲉⲓⲛⲉ <text:line-break/><text:span text:style-name="T1"> </text:span><text:span text:style-name="T2">(37/4) </text:span> [ⲙⲉ]ⲛ̣ ⲉⲩⲟⲉⲓ ⲛ̅ⲥⲛ̣[ⲉⲩ· ϩⲛ̅]‐ <text:line-break/><text:span text:style-name="T1"> </text:span><text:span text:style-name="T2">(37/5) </text:span> [ⲕ]ⲁⲩⲉ [ⲇ]ⲉ ⲉⲩϣⲟⲟ̣[ⲡ ϩⲁⲣⲓ] <text:line-break/><text:span text:style-name="T1"> </text:span><text:span text:style-name="T2">(37/6) </text:span> [ϩ]ⲁⲣⲁⲩ [.....]ⲙⲉ[ <text:line-break/><text:span text:style-name="T1"> </text:span><text:span text:style-name="T2">(37/7) </text:span> ⲁ̣ⲧⲟⲩ[ <text:line-break/><text:span text:style-name="T1"> </text:span><text:span text:style-name="T2">(37/8) </text:span> [..].[ <text:line-break/><text:span text:style-name="T1"> </text:span><text:span text:style-name="T2">(37/9) </text:span> (2 lines missing) <text:line-break/><text:span text:style-name="T1"> </text:span><text:span text:style-name="T2">(37/11) </text:span> [.]ⲧ̣ⲟ[ <text:line-break/><text:span text:style-name="T1"> </text:span><text:span text:style-name="T2">(37/12) </text:span> [.]ⲉⲓⲡⲁⲣ[ <text:line-break/><text:span text:style-name="T1"> </text:span><text:span text:style-name="T2">(37/13) </text:span> [ⲁ]ⲩ̣ⲱ ⲉⲩ[ <text:line-break/><text:span text:style-name="T1"> </text:span><text:span text:style-name="T2">(37/14) </text:span> ϫ̣ⲱⲥ [ <text:line-break/><text:span text:style-name="T1"> </text:span><text:span text:style-name="T2">(37/15) </text:span> ⲏ̣ ⲛⲉⲧ̣[ <text:line-break/><text:span text:style-name="T1"> </text:span><text:span text:style-name="T2">(37/16) </text:span> ⲏⲩ [.].[ 8+- ]ⲁⲃ[ <text:line-break/><text:span text:style-name="T1"> </text:span><text:span text:style-name="T2">(37/17) </text:span> ⲏ ⲕⲁⲧⲁ ⲛ[ⲉⲧ]ⲉ ⲟⲩ̣[ⲛ]ⲧⲟⲩ̣ <text:line-break/><text:span text:style-name="T1"> </text:span><text:span text:style-name="T2">(37/18) </text:span> ⲭⲣⲟⲛⲟⲥ [ⲙ̅ⲙ]ⲉⲩ ⲁⲩⲱ [ⲛⲉ]‐ <text:line-break/><text:span text:style-name="T1"> </text:span><text:span text:style-name="T2">(37/19) </text:span> ⲉⲓ· ⲏ ⲟⲩⲟⲩ̣ⲉⲧⲟⲩ ⲁⲣ̣[ⲁⲩ] <text:line-break/><text:span text:style-name="T1"> </text:span><text:span text:style-name="T2">(37/20) </text:span> ⲏ ⲉⲩϩⲁⲧⲣ̅ ⲁⲛⲟⲩⲉⲣⲏ[ⲩ] <text:line-break/><text:span text:style-name="T1"> </text:span><text:span text:style-name="T2">(37/21) </text:span> ⲏ ⲛⲉⲩ ⲟⲩⲁ[ⲉ]ⲉⲧⲟⲩ ⲏ [ⲛⲁ] <text:line-break/><text:span text:style-name="T1"> </text:span><text:span text:style-name="T2">(37/22) </text:span> ⲧⲥⲙⲏ ⲥⲛ̅ⲧⲉ̣· ⲏ ⲛⲁ̣ ⲧ̣[ⲥⲙⲏ] <text:line-break/><text:span text:style-name="T1"> </text:span><text:span text:style-name="T2">(37/23) </text:span> ⲛ̅ϩⲁⲡⲗⲟⲩⲛ· ⲏ ⲛ̣[ <text:line-break/><text:span text:style-name="T1"> </text:span><text:span text:style-name="T2">(37/24) </text:span> ⲛⲓⲙ· ⲏ ⲛ̅.[ <text:line-break/><text:span text:style-name="T1"> </text:span><text:span text:style-name="T2">(37/25) </text:span> ⲧⲟⲩ· ⲏ ⲛ.[ 7+- ϣⲟ]‐ <text:line-break/><text:span text:style-name="T1"> </text:span><text:span text:style-name="T2">(37/26) </text:span> ⲟⲡ ⲕⲁⲧⲁ ⲑ̣[ⲉ......ϣⲟ]‐ <text:line-break/><text:span text:style-name="T1"> </text:span><text:span text:style-name="T2">(37/27) </text:span> ⲟⲡ ⲇⲉ ⲁⲃⲁ[ⲗ <text:line-break/><text:span text:style-name="T1"> </text:span><text:span text:style-name="T2">(37/28) </text:span> ⲛⲉⲧⲣ̅[ⲥⲩⲙⲫⲱⲛⲓ <text:line-break/><text:soft-page-break/><text:span text:style-name="T1"> </text:span><text:span text:style-name="T2">(38/1) </text:span> ⲉⲩϣⲟⲟⲡ ϩⲁⲣⲓϩⲁⲣⲁⲩ· <text:line-break/><text:span text:style-name="T1"> </text:span><text:span text:style-name="T2">(38/2) </text:span> ϣⲁⲛ̣ⲧⲟⲩⲡⲁⲣϫⲟⲩ [ⲁⲩ]ⲱ <text:line-break/><text:span text:style-name="T1"> </text:span><text:span text:style-name="T2">(38/3) </text:span> ⲛ̣̅ⲥⲉϩⲁⲧⲣⲟⲩ· ϩⲛ̅ϩⲁ̣ⲉ̣[ⲓ] <text:line-break/><text:span text:style-name="T1"> </text:span><text:span text:style-name="T2">(38/4) </text:span> [ⲛⲉ ⲇⲉ] ⲟⲩⲛ ϭⲁⲙ ⲙ̅ⲙ[ⲉⲩ] <text:line-break/><text:span text:style-name="T1"> </text:span><text:span text:style-name="T2">(38/5) </text:span> [...] ⲕⲁⲧⲁ ⲛ̅ⲥ[ⲧⲟ]ⲓⲭⲓⲟ[ⲛ] <text:line-break/><text:span text:style-name="T1"> </text:span><text:span text:style-name="T2">(38/6) </text:span> [ⲛ̅ⲛⲉ]ⲧⲣ̣̅[ⲥⲩⲙⲫ]ⲱⲛⲓ· ⲉ[ <text:line-break/><text:span text:style-name="T1"> </text:span><text:span text:style-name="T2">(38/7) </text:span> [ 9+- ⲟ]ⲩⲇⲓⲁ <text:line-break/><text:span text:style-name="T1"> </text:span><text:span text:style-name="T2">(38/8) </text:span> [ 11+- ].[ <text:line-break/><text:span text:style-name="T1"> </text:span><text:span text:style-name="T2">(38/9) </text:span> (2 lines missing) <text:line-break/><text:span text:style-name="T1"> </text:span><text:span text:style-name="T2">(38/11) </text:span> [ 11+- ]. ⲇⲉ̣ [ <text:line-break/><text:span text:style-name="T1"> </text:span><text:span text:style-name="T2">(38/12) </text:span> [ 10+- ]ϣⲱⲡⲉ [ <text:line-break/><text:span text:style-name="T1"> </text:span><text:span text:style-name="T2">(38/13) </text:span> [ 10+- ]ⲛ̣ⲟⲩⲥ̣[ <text:line-break/><text:span text:style-name="T1"> </text:span><text:span text:style-name="T2">(38/14) </text:span> [ 11+- ]ⲡ ⲇⲉ̣ [ <text:line-break/><text:span text:style-name="T1"> </text:span><text:span text:style-name="T2">(38/15) </text:span> [.]ⲩ̣ⲁ̣[....ϩⲁⲣⲓ]ϩ̣ⲁⲣⲁ[ⲩ] <text:line-break/><text:span text:style-name="T1"> </text:span><text:span text:style-name="T2">(38/16) </text:span> [.]ⲥⲁ.[..]ⲛ̣[..ⲁ]ⲩ̣ⲱ̣ ⲛ̅ϣⲁ‐ <text:line-break/><text:span text:style-name="T1"> </text:span><text:span text:style-name="T2">(38/17) </text:span> [ⲙ]ⲛ̅ⲧ [ⲕ]ⲁⲧⲁ̣ [ⲛ]ⲉⲧⲉ ⲟⲩⲛ‐ <text:line-break/><text:span text:style-name="T1"> </text:span><text:span text:style-name="T2">(38/18) </text:span> [ⲧⲟ]ⲩ ⲥⲙⲏ· ⲁ̣[ⲩ]ⲱ̣ ⲥⲁⲡ ⲥⲛⲉⲩ <text:line-break/><text:span text:style-name="T1"> </text:span><text:span text:style-name="T2">(38/19) </text:span> [ⲕⲁ]ⲧ̣ⲁ ⲛⲉⲧⲣ̅[ⲥ]ⲩⲙⲫⲱⲛⲓ <text:line-break/><text:span text:style-name="T1"> </text:span><text:span text:style-name="T2">(38/20) </text:span> [ⲁⲩ]ⲱ ⲟⲩⲥⲁⲡ ⲛ̅ⲟⲩⲱⲧ ⲕⲁ‐ <text:line-break/><text:span text:style-name="T1"> </text:span><text:span text:style-name="T2">(38/21) </text:span> [ⲧⲁ] ⲡⲙⲁ ⲧⲏ̣ⲣϥ̅· ⲁⲩⲱ ϩⲛ̅ <text:line-break/><text:span text:style-name="T1"> </text:span><text:span text:style-name="T2">(38/22) </text:span> [ⲟⲩⲙ]ⲛ̣̅ⲧⲁⲧⲥⲁⲩⲛⲉ ⲕⲁⲧⲁ <text:line-break/><text:span text:style-name="T1"> </text:span><text:span text:style-name="T2">(38/23) </text:span> [ⲛⲉⲧ]ϣ̣ⲟⲟⲡ ϩⲙ̅ ⲡϣⲓⲃⲉ̣ <text:line-break/><text:span text:style-name="T1"> </text:span><text:span text:style-name="T2">(38/24) </text:span> [ 7+- ⲛ̅]ⲧⲁϩϣⲱⲡ[ⲉ] <text:line-break/><text:span text:style-name="T1"> </text:span><text:span text:style-name="T2">(38/25) </text:span> [ 8+- ]ⲟ̣ⲩ· ⲙⲛ̅ ⲡⲙ̣[ⲁ] <text:line-break/><text:span text:style-name="T1"> </text:span><text:span text:style-name="T2">(38/26) </text:span> [ⲧⲏⲣϥ̅...] ⲙ̣̅ⲡ→ϩⲁⲉ←· ⲁⲩ‐ <text:line-break/><text:span text:style-name="T1"> </text:span><text:span text:style-name="T2">(38/27) </text:span> [ⲱ......] ⲛ̣̅ⲧⲁⲩ ⲧⲏⲣⲟ̣[ⲩ] <text:line-break/><text:span text:style-name="T1"> </text:span><text:span text:style-name="T2">(38/28) </text:span> [ 7+- ⲉⲩϣ]ⲟ̣ⲟ̣ⲡ ⲙⲉⲛ̣ <text:line-break/><text:span text:style-name="T1"> </text:span><text:span text:style-name="T2">(39/1) </text:span> ⲉⲩϩⲏⲡ· ⲁⲗⲗⲁ ⲁϩⲟⲩϫⲟⲟⲩ <text:line-break/><text:span text:style-name="T1"> </text:span><text:span text:style-name="T2">(39/2) </text:span> ϩⲛ̅ ⲟⲩⲱⲛϩ ⲁⲃⲁⲗ· ⲟⲩⲧⲉ <text:line-break/><text:span text:style-name="T1"> </text:span><text:span text:style-name="T2">(39/3) </text:span> ⲙ̅ⲡⲟⲩϭⲱ ⲟⲩϣ ⲛ̅ⲟⲩⲁⲛϩⲟⲩ <text:line-break/><text:span text:style-name="T1"> </text:span><text:span text:style-name="T2">(39/4) </text:span> ⲁⲃⲁⲗ· ⲟⲩⲇⲉ ⲙ̅ⲡⲟⲩϭⲱ ⲟⲩϣ <text:line-break/><text:span text:style-name="T1"> </text:span><text:span text:style-name="T2">(39/5) </text:span> ⲛ̅ⲣ̅ⲟⲛⲟⲙⲁⲍⲉ ⲛ̅ⲛ̅ⲁⲅⲅⲉ‐ <text:line-break/><text:span text:style-name="T1"> </text:span><text:span text:style-name="T2">(39/6) </text:span> [ⲗ]ⲟ̣ⲥ· ⲛⲉⲧⲉ ⲟⲩⲛⲧⲟⲩ ⲥⲙⲏ <text:line-break/><text:span text:style-name="T1"> </text:span><text:span text:style-name="T2">(39/7) </text:span> [ⲇ]ⲉ ⲙ̅ⲙⲉ̣[ⲩ ⲥⲉϩⲁ]ⲧ̣ⲣ̅ ⲁⲛⲉⲧⲣ̅‐ <text:line-break/><text:span text:style-name="T1"> </text:span><text:span text:style-name="T2">(39/8) </text:span> [ⲥⲩ]ⲙⲫ[ⲱⲛⲓ ⲉⲓⲧ]ⲉ ⲙ̅ⲡⲥⲁⲛ‐ <text:line-break/><text:span text:style-name="T1"> </text:span><text:span text:style-name="T2">(39/9) </text:span> ⲃ̣ⲁ̣[ⲗ ⲉⲓⲧⲉ ⲙ̅ⲡⲥⲁ]ⲛϩⲟⲩⲛ· <text:line-break/><text:span text:style-name="T1"> </text:span><text:span text:style-name="T2">(39/10) </text:span> ϩⲓ̣ⲧ̣[ 9+- ⲁϩ]ⲟ̣ⲩ̣‐ <text:line-break/><text:span text:style-name="T1"> </text:span><text:span text:style-name="T2">(39/11) </text:span> ϫⲟⲟ[ⲥ <text:line-break/><text:span text:style-name="T1"> </text:span><text:span text:style-name="T2">(39/12) </text:span> ⲧⲥⲉ[ⲃⲁⲕ <text:line-break/><text:span text:style-name="T1"> </text:span><text:span text:style-name="T2">(39/13) </text:span> ⲡⲁⲗⲓⲛ ϣ̣[ⲁ ⲁⲛ]ⲏ̣ϩⲉ ⲁ̣[ⲩϫⲓ ⲏ]‐ <text:line-break/><text:span text:style-name="T1"> </text:span><text:span text:style-name="T2">(39/14) </text:span> ⲡⲉ ⲛ̅ϥⲧⲁⲩ [ⲛ̅]ⲥⲁⲡ· ⲁⲩ[ⲙⲓ]‐ <text:line-break/><text:span text:style-name="T1"> </text:span><text:span text:style-name="T2">(39/15) </text:span> ⲥⲉ ⲙ̅ⲙⲁⲩ [ⲛ̅ϣ]ⲁⲙⲛ̅ⲧ ⲛ̅‐ <text:line-break/><text:span text:style-name="T1"> </text:span><text:span text:style-name="T2">(39/16) </text:span> ⲥⲁⲡ ⲁⲩⲱ [ⲁ]ⲩϣⲱⲡⲉ̣ <text:line-break/><text:span text:style-name="T1"> </text:span><text:span text:style-name="T2">(39/17) </text:span> ⲙ̅ⲙⲛ̣̅ⲧ̣[......]ⲁⲛ̣[ <text:line-break/><text:span text:style-name="T1"> </text:span><text:span text:style-name="T2">(39/18) </text:span> ⲉⲧⲃⲉ ⲛⲉ[ⲉⲓ] ⲙⲉⲛ [ⲁ]ϩ̣ⲛ̅ϫ‐ <text:line-break/><text:span text:style-name="T1"> </text:span><text:span text:style-name="T2">(39/19) </text:span> ⲡⲉ ⲣⲱϣⲉ ϣ̅ϣⲉ ⲅⲁⲣ ⲁ‐ <text:line-break/><text:span text:style-name="T1"> </text:span><text:span text:style-name="T2">(39/20) </text:span> ⲧⲣⲉⲡⲟⲩⲉⲉⲓ ⲡⲟⲩⲉⲉⲓ ϫ̣ⲡⲉ‐ <text:line-break/><text:soft-page-break/><text:span text:style-name="T1"> </text:span><text:span text:style-name="T2">(39/21) </text:span> ϭⲁⲙ ⲛⲉϥ ⲛ̅ⲧⲁϥ ⲁϯ ⲕⲁⲣ‐ <text:line-break/><text:span text:style-name="T1"> </text:span><text:span text:style-name="T2">(39/22) </text:span> ⲡⲟⲥ· ⲁⲩⲱ [ⲛ̅]ⲧ̣ⲛ̅ⲧⲙ̅ϣⲱⲡⲉ <text:line-break/><text:span text:style-name="T1"> </text:span><text:span text:style-name="T2">(39/23) </text:span> ϣⲁ ⲁⲃⲁⲗ [ⲉ]ⲛ̣ⲛⲟⲩϫⲉ ⲛ̅‐ <text:line-break/><text:span text:style-name="T1"> </text:span><text:span text:style-name="T2">(39/24) </text:span> ⲥⲁⲁϩ[ⲉ] ⲛ̣̅[ⲥⲁ] ⲙ̣̅ⲙⲩⲥⲧⲏ[ⲣⲓ]‐ <text:line-break/><text:span text:style-name="T1"> </text:span><text:span text:style-name="T2">(39/25) </text:span> [ⲟ]ⲛ̣ [.....] ⲡ̣ⲉ ⲡⲛⲉ[ <text:line-break/><text:span text:style-name="T1"> </text:span><text:span text:style-name="T2">(39/26) </text:span> [ 7+- ⲅ]ⲁⲣ ⲉⲧⲟ[ⲉⲓ <text:line-break/><text:span text:style-name="T1"> </text:span><text:span text:style-name="T2">(39/27) </text:span> [....ⲛ̅ⲙ̅ⲯ]ⲩ̣ⲭⲏ· ⲛ̣[ <text:line-break/><text:span text:style-name="T1"> </text:span><text:span text:style-name="T2">(39/28) </text:span> [......ⲛ̅]ⲍ̣ⲱⲇ[ⲓⲟⲛ <text:line-break/><text:span text:style-name="T1"> </text:span><text:span text:style-name="T2">(39/29) </text:span> (2 lines missing) <text:line-break/><text:span text:style-name="T1"> </text:span><text:span text:style-name="T2">(40/1) </text:span> ⲛ̅ⲛⲟⲩϩⲩⲡⲟⲥⲧⲁⲥⲓⲥ ⲛ̅‐ <text:line-break/><text:span text:style-name="T1"> </text:span><text:span text:style-name="T2">(40/2) </text:span> ⲃⲣ̅ⲣ̅ⲉ· ⲡⲃⲉⲕⲉ ⲇⲉ ⲉⲧⲟⲩ‐ <text:line-break/><text:span text:style-name="T1"> </text:span><text:span text:style-name="T2">(40/3) </text:span> ⲛⲁⲕⲁⲁϥ ⲁϩⲣⲏⲓ̈ ⲙ̅ⲡⲉⲉⲓ <text:line-break/><text:span text:style-name="T1"> </text:span><text:span text:style-name="T2">(40/4) </text:span> ⲛ̅ⲧⲉⲉⲓⲙⲓⲛⲉ ⲡⲉ ⲡⲟⲩϫⲉ‐ <text:line-break/><text:span text:style-name="T1"> </text:span><text:span text:style-name="T2">(40/5) </text:span> ⲉⲓ· ⲏ ⲡⲉⲛⲁⲛⲧⲓⲟⲛ ⲉϥⲛ̣[ⲁ]‐ <text:line-break/><text:span text:style-name="T1"> </text:span><text:span text:style-name="T2">(40/6) </text:span> ϣⲱⲡⲉ ⲙ̣̅ⲙⲉ̣ⲩ ⲙ̅ⲡⲉ̣‐ <text:line-break/><text:span text:style-name="T1"> </text:span><text:span text:style-name="T2">(40/7) </text:span> ⲧⲣ̅ ⲛⲁⲃ̣[ⲓ· ⲡⲉⲧⲣ̅] ⲛ̣ⲁⲃⲓ ⲟ[ⲩⲁ]‐ <text:line-break/><text:span text:style-name="T1"> </text:span><text:span text:style-name="T2">(40/8) </text:span> ⲉⲉⲧϥ̅ ⲉ[....] ⲛ̣ⲁϣⲱ̣[ⲡⲉ] <text:line-break/><text:span text:style-name="T1"> </text:span><text:span text:style-name="T2">(40/9) </text:span> [ϩⲛ̅] ⲟ̣[ⲩ 7+- ϩⲛ̅] ⲟⲩ <text:line-break/><text:span text:style-name="T1"> </text:span><text:span text:style-name="T2">(40/10) </text:span> [ 12+- ] ⲙ̣̅ⲡⲕⲉ̣ <text:line-break/><text:span text:style-name="T1"> </text:span><text:span text:style-name="T2">(40/11) </text:span> [ 12+- ] ⲛ̅ⲛ[ <text:line-break/><text:span text:style-name="T1"> </text:span><text:span text:style-name="T2">(40/12) </text:span> [....]ϣⲉ̣[... ϫⲉ]ⲕ̣ⲁⲥⲉ <text:line-break/><text:span text:style-name="T1"> </text:span><text:span text:style-name="T2">(40/13) </text:span> [ϩⲁ]ⲧⲉϩⲏ ⲙ̣̅ⲡ̣ⲁⲧ→ⲕ←ⲣ̅ⲇⲟ‐ <text:line-break/><text:span text:style-name="T1"> </text:span><text:span text:style-name="T2">(40/14) </text:span> ⲕ̣ⲓⲙⲁⲍⲉ [ⲙ̅ⲡ]ⲉⲧⲉ 〈ⲉⲣⲉ〉ⲟⲩⲉ‐ <text:line-break/><text:span text:style-name="T1"> </text:span><text:span text:style-name="T2">(40/15) </text:span> ⲉⲓ ⲛⲁⲧⲉⲟ̣[ⲩⲟ] ⲛ̅ⲕⲉⲟⲩ <text:line-break/><text:span text:style-name="T1"> </text:span><text:span text:style-name="T2">(40/16) </text:span> [ⲉ]ⲉⲓ̣ [ⲉⲧⲃⲉ ⲟⲩⲇⲩ]ⲛ̣ⲁⲙⲓⲥ ⲉⲥ‐ <text:line-break/><text:span text:style-name="T1"> </text:span><text:span text:style-name="T2">(40/17) </text:span> ϫ̣ⲁⲥ[ⲓ] ⲙⲛ̅ ⲟⲩ[ⲅ]ⲛⲱ̣ⲥⲓⲥ· <text:line-break/><text:span text:style-name="T1"> </text:span><text:span text:style-name="T2">(40/18) </text:span> ⲛ̅ⲑⲉⲓⲟⲛ ⲙⲛ̅ ⲟⲩϫⲓⲙ ⲉ‐ <text:line-break/><text:span text:style-name="T1"> </text:span><text:span text:style-name="T2">(40/19) </text:span> ⲙⲁⲩϣⲙⲓϣⲉ ⲁϩⲏⲧϥ̅· <text:line-break/><text:span text:style-name="T1"> </text:span><text:span text:style-name="T2">(40/20) </text:span> ⲁⲗⲗⲁ ⲉⲕⲁⲣ̅ⲇⲟⲕⲓⲙⲁⲍⲉ <text:line-break/><text:span text:style-name="T1"> </text:span><text:span text:style-name="T2">(40/21) </text:span> ϫⲉ ⲉϣ ⲡⲉ ⲟ̣[ⲩ]ⲁ̣ⲝⲓⲟⲥ ⲁⲧⲣⲉϥ‐ <text:line-break/><text:span text:style-name="T1"> </text:span><text:span text:style-name="T2">(40/22) </text:span> ⲟ̣ⲩⲁⲛϩⲟⲩ [ⲁ]ⲃⲁⲗ· ⲉⲕⲥⲁⲩ‐ <text:line-break/><text:span text:style-name="T1"> </text:span><text:span text:style-name="T2">(40/23) </text:span> [ⲛ]ⲉ ϫⲉ ⲥⲉ̣.[.].ⲛ̣̅[.] ⲁⲡⲓ‐ <text:line-break/><text:span text:style-name="T1"> </text:span><text:span text:style-name="T2">(40/24) </text:span> [ⲧⲛ̅] ϣⲁ ⲡϫ̣[....ⲛ]ⲉ̣ⲧⲣ̣̅ <text:line-break/><text:span text:style-name="T1"> </text:span><text:span text:style-name="T2">(40/25) </text:span> [ⲛ]ⲁⲃⲓ· ⲉⲩ[ <text:line-break/><text:span text:style-name="T1"> </text:span><text:span text:style-name="T2">(40/26) </text:span> [ⲙ̅ⲡⲓ]ⲱⲧ ⲧ[ <text:line-break/><text:span text:style-name="T1"> </text:span><text:span text:style-name="T2">(40/27) </text:span> [...]ⲡⲟⲩ[ <text:line-break/><text:span text:style-name="T1"> </text:span><text:span text:style-name="T2">(40/28) </text:span> (2 lines missing) <text:line-break/><text:span text:style-name="T1"> </text:span><text:span text:style-name="T2">(41/1) </text:span> ⲡⲉⲧⲉϣϣⲉ· ⲙ̅ⲡⲣ̅ⲟⲩⲱϣⲉ <text:line-break/><text:span text:style-name="T1"> </text:span><text:span text:style-name="T2">(41/2) </text:span> ⲁϯ ϭⲁⲙ ⲙ̅ⲡⲁⲓⲥⲑⲏⲧⲟⲥ ⲕⲟⲥ‐ <text:line-break/><text:span text:style-name="T1"> </text:span><text:span text:style-name="T2">(41/3) </text:span> ⲙⲟⲥ ⲉⲧⲉⲧⲛ̅ϭⲱϣⲧ ⲛ̅ⲥⲱⲉⲓ‐ <text:line-break/><text:span text:style-name="T1"> </text:span><text:span text:style-name="T2">(41/4) </text:span> ⲉⲛ ⲡⲉⲉⲓ ⲛ̅ⲧ̣ⲁϩϫⲓ ⲙ̅ⲡⲟⲩϫⲉ‐ <text:line-break/><text:span text:style-name="T1"> </text:span><text:span text:style-name="T2">(41/5) </text:span> [ⲉ]ⲓ ⲁⲃⲁⲗ ϩⲙ̅ ⲡⲛⲟⲏⲧⲟⲥ ⲕⲟⲥ‐ <text:line-break/><text:span text:style-name="T1"> </text:span><text:span text:style-name="T2">(41/6) </text:span> [ⲙⲟ]ⲥ· ⲛⲉⲉⲓϣⲉ〈ϫⲉ〉 ⲇⲉ ⲁⲣⲏϩ ⲁⲣⲱ‐ <text:line-break/><text:span text:style-name="T1"> </text:span><text:span text:style-name="T2">(41/7) </text:span> [ⲧⲛ̅ ⲙ̅]ⲡⲣ̅[....]ⲟⲩ ⲛ̅ⲟⲩⲁⲓ̣ <text:line-break/><text:span text:style-name="T1"> </text:span><text:span text:style-name="T2">(41/8) </text:span> [ 9+- ]ⲟⲩⲧⲉ ⲉⲡⲟⲩ <text:line-break/><text:span text:style-name="T1"> </text:span><text:span text:style-name="T2">(41/9) </text:span> (2 lines missing) <text:line-break/><text:span text:style-name="T1"> </text:span><text:span text:style-name="T2">(41/11) </text:span> [ 10+- ]ⲛⲛⲉ̣[ <text:line-break/><text:soft-page-break/><text:span text:style-name="T1"> </text:span><text:span text:style-name="T2">(41/12) </text:span> [ϥ]ⲣ̣̅ⲛⲟ̣[ⲉⲓ.....] ⲛ̅ϥϥⲓ[ <text:line-break/><text:span text:style-name="T1"> </text:span><text:span text:style-name="T2">(41/13) </text:span> [.]ⲉ̣ⲩ· ϫ̣[.... ⲡ]ⲕ̣ⲉⲥⲉ[ⲉⲡⲉ] <text:line-break/><text:span text:style-name="T1"> </text:span><text:span text:style-name="T2">(41/14) </text:span> ϯⲛ[ⲁϣⲉϫⲉ ⲁ]ⲣⲁⲩ ⲡϫ̣[ⲱⲕ] <text:line-break/><text:span text:style-name="T1"> </text:span><text:span text:style-name="T2">(41/15) </text:span> ⲁ̣ⲃⲁⲗ̣ [.....]ϫⲉ· ϣⲓⲛⲁ <text:line-break/><text:span text:style-name="T1"> </text:span><text:span text:style-name="T2">(41/16) </text:span> [ⲛ̅]ϥ̣ⲁⲓⲉ[ⲩ·....]ⲉ ⲉ̣ⲧ̣ⲣ̅ⲛⲁⲃ[ⲓ] <text:line-break/><text:span text:style-name="T1"> </text:span><text:span text:style-name="T2">(41/17) </text:span> [ 9+- ]ⲕⲁ̣[..] ⲙ̣̅[ⲡ]ⲟⲩ <text:line-break/><text:span text:style-name="T1"> </text:span><text:span text:style-name="T2">(41/18) </text:span> [ⲣ̅]ⲛ̣ⲟⲉⲓ ⲙ̅ⲙ[ⲁ]ⲩ ⲛ̅ϭⲓ ⲙ̅ⲯⲩ‐ <text:line-break/><text:span text:style-name="T1"> </text:span><text:span text:style-name="T2">(41/19) </text:span> [ⲭ]ⲏ ⲉⲧϩⲛ̅ ⲥⲱⲙⲁ· ⲛⲉⲧϩⲓϫⲛ̅ <text:line-break/><text:span text:style-name="T1"> </text:span><text:span text:style-name="T2">(41/20) </text:span> ⲡ̣ⲕⲁϩ ⲙⲛ̅ ⲛⲉⲧⲙ̅ⲡⲃⲗ̅ ⲙ̅‐ <text:line-break/><text:span text:style-name="T1"> </text:span><text:span text:style-name="T2">(41/21) </text:span> ⲡⲥⲱⲙⲁ· ⲛⲉ̣[ⲧϩ]ⲛ̅ ⲧⲡⲉ· ⲛⲁ‐ <text:line-break/><text:span text:style-name="T1"> </text:span><text:span text:style-name="T2">(41/22) </text:span> ϣⲱⲟⲩ ⲁⲛ̅[ⲁⲅⲅ]ⲉⲗⲟⲥ· ⲡⲙⲁ‐ <text:line-break/><text:span text:style-name="T1"> </text:span><text:span text:style-name="T2">(41/23) </text:span> ⲛ̅ⲧⲁϩⲛ̅[ϣⲉϫⲉ] ⲁ̣ⲣ̣ⲁϥ ϩ̣ⲛ̅ <text:line-break/><text:span text:style-name="T1"> </text:span><text:span text:style-name="T2">(41/24) </text:span> ϣ̣ⲉ̣ϫ̣ⲉ̣ [ⲛⲓⲙ·] ⲛⲉ̣ⲉⲓ ϫ̣[ <text:line-break/><text:span text:style-name="T1"> </text:span><text:span text:style-name="T2">(41/25) </text:span> [ 9+- ] ⲛ̣̅ⲥⲓⲟⲩ [ <text:line-break/><text:span text:style-name="T1"> </text:span><text:span text:style-name="T2">(41/26) </text:span> ⲧⲟⲩ[ <text:line-break/><text:span text:style-name="T1"> </text:span><text:span text:style-name="T2">(41/27) </text:span> ϫ̣ⲟⲩⲙ̣[ⲉ <text:line-break/><text:span text:style-name="T1"> </text:span><text:span text:style-name="T2">(41/28) </text:span> ⲉⲓⲧⲉ ⲏⲇ̣[ⲏ <text:line-break/><text:span text:style-name="T1"> </text:span><text:span text:style-name="T2">(41/29) </text:span> ⲁϩⲟⲩⲛ ⲁⲫ̣[ <text:line-break/><text:span text:style-name="T1"> </text:span><text:span text:style-name="T2">(41/30) </text:span> ⲛⲉⲉⲓⲉⲧ̣[ϥ̅ <text:line-break/><text:span text:style-name="T1"> </text:span><text:span text:style-name="T2">(42/1) </text:span> ⲏ ⲉϥ̣ϭⲱϣⲧ ⲁϩⲟⲩⲛ ⲁⲡⲉ‐ <text:line-break/><text:span text:style-name="T1"> </text:span><text:span text:style-name="T2">(42/2) </text:span> ⲥⲛⲉⲩ ⲏ ⲉϥϭⲱϣⲧ ⲁϩⲟⲩⲛ <text:line-break/><text:span text:style-name="T1"> </text:span><text:span text:style-name="T2">(42/3) </text:span> ⲁⲡⲥⲁϣϥ̅ ⲙ̅ⲡⲗⲁⲛⲏⲧⲏⲥ <text:line-break/><text:span text:style-name="T1"> </text:span><text:span text:style-name="T2">(42/4) </text:span> ⲏ ⲁϩⲟⲩⲛ ⲁⲡⲙⲛ̅ⲧⲥⲛⲁⲩⲥ <text:line-break/><text:span text:style-name="T1"> </text:span><text:span text:style-name="T2">(42/5) </text:span> ⲛ̅ⲍⲱⲇⲓⲟⲛ· ⲏ ⲁϩⲟⲩⲛ ⲁ‐ <text:line-break/><text:span text:style-name="T1"> </text:span><text:span text:style-name="T2">(42/6) </text:span> ⲡⲙⲁⲁⲃ[ⲉⲥ]ⲉ̣ ⲛ̅ϩⲱⲣ̣ⲟ‐ <text:line-break/><text:span text:style-name="T1"> </text:span><text:span text:style-name="T2">(42/7) </text:span> ⲥⲕ̣ⲟⲡⲟ̣[ⲥ....].[ <text:line-break/><text:span text:style-name="T1"> </text:span><text:span text:style-name="T2">(42/8) </text:span> (2 lines missing) <text:line-break/><text:span text:style-name="T1"> </text:span><text:span text:style-name="T2">(42/10) </text:span> [..]ⲥ̣ⲉ ⲛ̅[ <text:line-break/><text:span text:style-name="T1"> </text:span><text:span text:style-name="T2">(42/11) </text:span> [.]ϣⲉ ϩⲟ̣[......]ⲉⲧ̣[ <text:line-break/><text:span text:style-name="T1"> </text:span><text:span text:style-name="T2">(42/12) </text:span> [.]ⲙⲛ̅ⲧ[ 7+- ]ⲡ̣ⲟⲣ. <text:line-break/><text:span text:style-name="T1"> </text:span><text:span text:style-name="T2">(42/13) </text:span> [.]ⲛ̣ ⲛ̣ⲉ ⲛ[ⲉⲉⲓ ⲡ]ⲏϩ ⲁ̣‐ <text:line-break/><text:span text:style-name="T1"> </text:span><text:span text:style-name="T2">(42/14) </text:span> ϩⲣⲏⲓ̈ ⲁϣ̣[......] ⲙ̅‐ <text:line-break/><text:span text:style-name="T1"> </text:span><text:span text:style-name="T2">(42/15) </text:span> ⲙⲟ..[ⲛ̅]ⲁ[......]ⲁⲛ <text:line-break/><text:span text:style-name="T1"> </text:span><text:span text:style-name="T2">(42/16) </text:span> ⲧⲟ.[..] ⲙ̅ⲡ̣[.....] ⲙⲛ̣̅ <text:line-break/><text:span text:style-name="T1"> </text:span><text:span text:style-name="T2">(42/17) </text:span> [ⲛ]ⲓ̣ⲁⲯ̣ ⲉⲓⲧ[ⲉ ⲛⲉⲧϩⲛ̅ ⲧⲡⲉ] <text:line-break/><text:span text:style-name="T1"> </text:span><text:span text:style-name="T2">(42/18) </text:span> ⲉⲓⲧⲉ ⲛⲉⲧϩⲓϫⲙ̣̅ ⲡⲕⲁϩ̣ <text:line-break/><text:span text:style-name="T1"> </text:span><text:span text:style-name="T2">(42/19) </text:span> ⲙⲛ̅ ⲛⲉⲧϩⲁⲡⲉⲥⲏⲧ ⲙ̅ⲡ[ⲕⲁϩ] <text:line-break/><text:span text:style-name="T1"> </text:span><text:span text:style-name="T2">(42/20) </text:span> ⲕⲁⲧⲁ ⲛ̅ⲕⲟⲓⲛⲱⲛⲓⲁ ⲙⲛ̅ <text:line-break/><text:span text:style-name="T1"> </text:span><text:span text:style-name="T2">(42/21) </text:span> ⲙ̅ⲙⲉⲣⲓⲥⲙⲟ̣[ⲥ] ⲛⲁⲃⲁⲗ ϩⲛ̅ <text:line-break/><text:span text:style-name="T1"> </text:span><text:span text:style-name="T2">(42/22) </text:span> ⲛⲉⲉⲓ ⲁⲩⲱ [ϩ]ⲛ̅ ⲡⲕⲉⲥⲉ‐ <text:line-break/><text:span text:style-name="T1"> </text:span><text:span text:style-name="T2">(42/23) </text:span> ⲉⲡ[ⲉ] ⲡ[.....] ⲙ̅ⲙⲉⲣⲟⲥ <text:line-break/><text:span text:style-name="T1"> </text:span><text:span text:style-name="T2">(42/24) </text:span> [ⲕⲁ]ⲧ̣ⲁ ⲅⲉⲛⲟ̣[ⲥ ⲁⲩ]ⲱ̣ ⲕⲁⲧⲁ <text:line-break/><text:span text:style-name="T1"> </text:span><text:span text:style-name="T2">(42/25) </text:span> [ⲉⲓ]ⲛ̣ⲉ ..[ <text:line-break/><text:span text:style-name="T1"> </text:span><text:span text:style-name="T2">(42/26) </text:span> [ 13+- ].[.]. <text:line-break/><text:span text:style-name="T1"> </text:span><text:span text:style-name="T2">(42/27) </text:span> [ 10+- ⲥ]ⲉ̣ⲛⲁϩⲩ <text:line-break/><text:span text:style-name="T1"> </text:span><text:span text:style-name="T2">(42/28) </text:span> [ⲡⲟⲧⲁⲥⲥⲉ· ⲉ]ⲩⲛⲧⲉⲥ ϭⲁ[ⲙ] <text:line-break/><text:span text:style-name="T1"> </text:span><text:span text:style-name="T2">(42/29) </text:span> [ⲙ̅ⲙⲉⲩ.....] ⲙ̅ⲡⲥⲁϩⲣⲉ <text:line-break/><text:soft-page-break/><text:span text:style-name="T1"> </text:span><text:span text:style-name="T2">(42/30) </text:span> [.....ⲥⲉϣⲟⲟ]ⲡ ϩⲁⲣⲓϩⲁⲣ[ⲁⲩ] <text:line-break/><text:span text:style-name="T1"> </text:span><text:span text:style-name="T2">(43/3) </text:span> (3 lines missing) <text:line-break/><text:span text:style-name="T1"> </text:span><text:span text:style-name="T2">(43/4) </text:span> [.]ⲉⲩ[.].[ <text:line-break/><text:span text:style-name="T1"> </text:span><text:span text:style-name="T2">(43/5) </text:span> ⲙ̣̅ⲡⲟⲩⲁⲉⲓ̣[ <text:line-break/><text:span text:style-name="T1"> </text:span><text:span text:style-name="T2">(43/6) </text:span> [.] ⲛⲓⲙ [ <text:line-break/><text:span text:style-name="T1"> </text:span><text:span text:style-name="T2">(43/7) </text:span> (+-12 lines missing) <text:line-break/><text:span text:style-name="T1"> </text:span><text:span text:style-name="T2">(43/19) </text:span> [....].[ 9+- ]ⲟ[ <text:line-break/><text:span text:style-name="T1"> </text:span><text:span text:style-name="T2">(43/20) </text:span> [ⲥ]ⲱⲙⲁ ⲙ̅ⲙ[......]ⲧ̣ⲡ.[ <text:line-break/><text:span text:style-name="T1"> </text:span><text:span text:style-name="T2">(43/21) </text:span> [ⲟ]ⲩ ⲕⲱ[.....ⲃ]ⲁⲣⲃ[ⲏ]‐ <text:line-break/><text:span text:style-name="T1"> </text:span><text:span text:style-name="T2">(43/22) </text:span> [ⲗⲱ] ⲛ̅ⲛⲟⲩ[ⲧⲉ.....]ⲉⲡ[ <text:line-break/><text:span text:style-name="T1"> </text:span><text:span text:style-name="T2">(43/23) </text:span> [..]ⲉⲧⲉ[ <text:line-break/><text:span text:style-name="T1"> </text:span><text:span text:style-name="T2">(43/24) </text:span> (+-3 lines missing) <text:line-break/><text:span text:style-name="T1"> </text:span><text:span text:style-name="T2">(43/25) </text:span> [.]ⲏⲧⲟⲥ ⲁ[ <text:line-break/><text:span text:style-name="T1"> </text:span><text:span text:style-name="T2">(43/26) </text:span> .ⲓⲧⲏϣⲟⲧ[ <text:line-break/><text:span text:style-name="T1"> </text:span><text:span text:style-name="T2">(43/27) </text:span> (1 line missing) <text:line-break/><text:span text:style-name="T1"> </text:span><text:span text:style-name="T2">(44/3) </text:span> (3 lines missing) <text:line-break/><text:span text:style-name="T1"> </text:span><text:span text:style-name="T2">(44/4) </text:span> [ 8+- ⲟ]ⲩⲁ[ⲛ]ϩ̣ⲟⲩ [ⲁ]‐ <text:line-break/><text:span text:style-name="T1"> </text:span><text:span text:style-name="T2">(44/5) </text:span> [ⲃⲁⲗ......] ⲛ̅ⲧⲉⲉⲓⲙ[ⲓ]‐ <text:line-break/><text:span text:style-name="T1"> </text:span><text:span text:style-name="T2">(44/6) </text:span> [ⲛⲉ 8+- ] ⲛ̅ⲧⲉⲉⲓ[ <text:line-break/><text:span text:style-name="T1"> </text:span><text:span text:style-name="T2">(44/7) </text:span> (+-11 lines missing) <text:line-break/><text:span text:style-name="T1"> </text:span><text:span text:style-name="T2">(44/18) </text:span> ⲱ̣[ <text:line-break/><text:span text:style-name="T1"> </text:span><text:span text:style-name="T2">(44/19) </text:span> ⲱ̣[ 9+- ]ⲕ̣ⲙ[.].[ <text:line-break/><text:span text:style-name="T1"> </text:span><text:span text:style-name="T2">(44/20) </text:span> [ⲁ]ⲅⲅⲉ[ⲗⲟⲥ ⲛ̅ⲛⲟ]ⲏ̣ⲧⲟⲥ· ⲉⲥⲣ̅[ <text:line-break/><text:span text:style-name="T1"> </text:span><text:span text:style-name="T2">(44/21) </text:span> ⲧⲉ ⲛ̣̅[......ⲛ]ⲟⲏⲧⲟⲥ̣ [ <text:line-break/><text:span text:style-name="T1"> </text:span><text:span text:style-name="T2">(44/22) </text:span> [.]ⲡ[ 8+- ]ⲡⲥⲁ[ϩⲣⲉ <text:line-break/><text:span text:style-name="T1"> </text:span><text:span text:style-name="T2">(44/23) </text:span> [ 8+- ⲧⲟ]ⲩϫⲟ ⲁ̣[ <text:line-break/><text:span text:style-name="T1"> </text:span><text:span text:style-name="T2">(44/24) </text:span> (+-3 lines missing) <text:line-break/><text:span text:style-name="T1"> </text:span><text:span text:style-name="T2">(44/25) </text:span> [ +-8 ] ⲙ̣̅ⲙⲁⲩ ⲥⲟ̣[ <text:line-break/><text:span text:style-name="T1"> </text:span><text:span text:style-name="T2">(44/26) </text:span> [ +-8 ].[.]ⲉⲣⲉⲡⲁ̣[ <text:line-break/><text:span text:style-name="T1"> </text:span><text:span text:style-name="T2">(44/27) </text:span> (1 line missing) <text:line-break/><text:span text:style-name="T1"> </text:span><text:span text:style-name="T2">(45/1) </text:span> [.....].[ <text:line-break/><text:span text:style-name="T1"> </text:span><text:span text:style-name="T2">(45/2) </text:span> [..] ⲙ̣̅ⲙⲁⲛ[ <text:line-break/><text:span text:style-name="T1"> </text:span><text:span text:style-name="T2">(45/3) </text:span> [...]ⲕⲟⲥⲙⲟⲥ̣ [ <text:line-break/><text:span text:style-name="T1"> </text:span><text:span text:style-name="T2">(45/4) </text:span> [ⲟ]ⲥ ⲁⲩⲱ [ <text:line-break/><text:span text:style-name="T1"> </text:span><text:span text:style-name="T2">(45/5) </text:span> [.]ⲓⲕⲟⲥ [ <text:line-break/><text:span text:style-name="T1"> </text:span><text:span text:style-name="T2">(45/6) </text:span> [ⲕ]ⲟⲥⲙ[ⲟⲥ <text:line-break/><text:span text:style-name="T1"> </text:span><text:span text:style-name="T2">(45/7) </text:span> (+-13 lines missing) <text:line-break/><text:span text:style-name="T1"> </text:span><text:span text:style-name="T2">(45/20) </text:span> [.]ⲉⲡ ⲛ̅.[ <text:line-break/><text:span text:style-name="T1"> </text:span><text:span text:style-name="T2">(45/21) </text:span> ⲁϩⲟⲩⲉⲓ [ <text:line-break/><text:span text:style-name="T1"> </text:span><text:span text:style-name="T2">(45/22) </text:span> [.]ⲁⲍⲉ ⲇⲉ̣ [ <text:line-break/><text:span text:style-name="T1"> </text:span><text:span text:style-name="T2">(45/23) </text:span> ⲙ̣ⲛ̅ ⲛⲉ[ <text:line-break/><text:span text:style-name="T1"> </text:span><text:span text:style-name="T2">(45/24) </text:span> ⲛⲉⲧⲟⲩ[ <text:line-break/><text:span text:style-name="T1"> </text:span><text:span text:style-name="T2">(45/25) </text:span> ⲛ̣̅[ <text:line-break/><text:span text:style-name="T1"> </text:span><text:span text:style-name="T2">(45/26) </text:span> (+-4 lines missing) <text:line-break/><text:span text:style-name="T1"> </text:span><text:span text:style-name="T2">(46/1) </text:span> [......].ⲟⲩⲁ̣[ <text:line-break/><text:span text:style-name="T1"> </text:span><text:span text:style-name="T2">(46/2) </text:span> [.....].ⲟⲟⲩⲛⲉ[ <text:line-break/><text:span text:style-name="T1"> </text:span><text:span text:style-name="T2">(46/3) </text:span> [.....].ⲉ̣ⲉ̣ⲓ· ⲡⲁⲁ̣[ <text:line-break/><text:soft-page-break/><text:span text:style-name="T1"> </text:span><text:span text:style-name="T2">(46/4) </text:span> [ 9+- ]ⲏⲩⲉ ⲙ̣̅.[ <text:line-break/><text:span text:style-name="T1"> </text:span><text:span text:style-name="T2">(46/5) </text:span> [ 10+- ] ⲉϥⲟ[ⲉⲓ ⲛ̅ <text:line-break/><text:span text:style-name="T1"> </text:span><text:span text:style-name="T2">(46/6) </text:span> [ 9+- ⲛ̅]ⲑⲉ ⲛ̅[ <text:line-break/><text:span text:style-name="T1"> </text:span><text:span text:style-name="T2">(46/7) </text:span> (+-13 lines missing) <text:line-break/><text:span text:style-name="T1"> </text:span><text:span text:style-name="T2">(46/20) </text:span> [ 9+- ]ⲡϩⲣ̣ⲁ̣ⲩ [ⲛ̅] <text:line-break/><text:span text:style-name="T1"> </text:span><text:span text:style-name="T2">(46/21) </text:span> [ 9+- ]ⲣⲉⲛ· ⲙ[ⲛ̅] <text:line-break/><text:span text:style-name="T1"> </text:span><text:span text:style-name="T2">(46/22) </text:span> [ 9+- ]ⲁ̣ⲉⲓⲧⲟⲩ[ <text:line-break/><text:span text:style-name="T1"> </text:span><text:span text:style-name="T2">(46/23) </text:span> [......ϣⲁ ⲁⲛ]ⲏϩⲉ ⲙ̣[ <text:line-break/><text:span text:style-name="T1"> </text:span><text:span text:style-name="T2">(46/24) </text:span> [ 9+- ⲣ]ⲉⲛ ⲙⲉⲛ̣ <text:line-break/><text:span text:style-name="T1"> </text:span><text:span text:style-name="T2">(46/25) </text:span> [ 13+- ]ⲕⲟⲥ <text:line-break/><text:span text:style-name="T1"> </text:span><text:span text:style-name="T2">(46/26) </text:span> (+-4 lines missing) <text:line-break/><text:span text:style-name="T1"> </text:span><text:span text:style-name="T2">(55/15) </text:span> (+-15 lines missing) <text:line-break/><text:span text:style-name="T1"> </text:span><text:span text:style-name="T2">(55/16) </text:span> .[ <text:line-break/><text:span text:style-name="T1"> </text:span><text:span text:style-name="T2">(55/17) </text:span> ⲉⲧⲁϩ̣ⲓ̣[ⲕⲁ]ⲣⲱ̣[ⲉⲓ ⲡⲁϫⲉⲓ ϫⲉ] <text:line-break/><text:span text:style-name="T1"> </text:span><text:span text:style-name="T2">(55/18) </text:span> ⲙⲁⲧⲁⲙⲁ[ⲉⲓ <text:line-break/><text:span text:style-name="T1"> </text:span><text:span text:style-name="T2">(55/19) </text:span> ⲉ̣ϣ̣ ⲧⲉ ⲧϭⲁ[ⲙ <text:line-break/><text:span text:style-name="T1"> </text:span><text:span text:style-name="T2">(55/20) </text:span> ⲛ̣ⲁ̣ϫⲱⲕⲙ̅ [ <text:line-break/><text:span text:style-name="T1"> </text:span><text:span text:style-name="T2">(55/21) </text:span> [ⲅⲉ]ⲛⲉⲁ ⲧⲏ̣[ⲣⲥ̅ <text:line-break/><text:span text:style-name="T1"> </text:span><text:span text:style-name="T2">(55/22) </text:span> [..].ⲙ̣ⲛ̣̅.[ <text:line-break/><text:span text:style-name="T1"> </text:span><text:span text:style-name="T2">(55/23) </text:span> (+-7 lines missing) <text:line-break/><text:span text:style-name="T1"> </text:span><text:span text:style-name="T2">(56/15) </text:span> (+-15 lines missing) <text:line-break/><text:span text:style-name="T1"> </text:span><text:span text:style-name="T2">(56/16) </text:span> [ 16+- ]ⲙ <text:line-break/><text:span text:style-name="T1"> </text:span><text:span text:style-name="T2">(56/17) </text:span> [ 8+- ]ⲙ̣̅ⲙⲁⲧⲉ ⲡⲛⲁ. <text:line-break/><text:span text:style-name="T1"> </text:span><text:span text:style-name="T2">(56/18) </text:span> [ 8+- ].ϥ· ⲉ[ⲙ]ⲡϣⲁ <text:line-break/><text:span text:style-name="T1"> </text:span><text:span text:style-name="T2">(56/19) </text:span> [ 8+- ]ⲏⲣ ⲡⲉ· ⲁⲩ[ⲱ] <text:line-break/><text:span text:style-name="T1"> </text:span><text:span text:style-name="T2">(56/20) </text:span> [ 7+- ] ⲧⲏⲣϥ̅ ⲙ̣̅ⲡ̣[ <text:line-break/><text:span text:style-name="T1"> </text:span><text:span text:style-name="T2">(56/21) </text:span> [ 7+- ].ⲁ ϩⲛ̅ ⲧ̣[ <text:line-break/><text:span text:style-name="T1"> </text:span><text:span text:style-name="T2">(56/22) </text:span> (+-8 lines missing) <text:line-break/><text:span text:style-name="T1"> </text:span><text:span text:style-name="T2">(57/16) </text:span> (+-16 lines missing) <text:line-break/><text:span text:style-name="T1"> </text:span><text:span text:style-name="T2">(57/17) </text:span> ϩⲏ[ <text:line-break/><text:span text:style-name="T1"> </text:span><text:span text:style-name="T2">(57/18) </text:span> ⲅⲛ[ⲱⲥⲓⲥ <text:line-break/><text:span text:style-name="T1"> </text:span><text:span text:style-name="T2">(57/19) </text:span> ⲣⲟ[.]ⲁ̣ⲣ[ <text:line-break/><text:span text:style-name="T1"> </text:span><text:span text:style-name="T2">(57/20) </text:span> ⲙⲟⲩⲛ ⲁⲃ[ⲁⲗ <text:line-break/><text:span text:style-name="T1"> </text:span><text:span text:style-name="T2">(57/21) </text:span> ⲙ̣̅ⲡ̣ⲛⲁϭ ⲛ̅[ <text:line-break/><text:span text:style-name="T1"> </text:span><text:span text:style-name="T2">(57/22) </text:span> ϫⲉ ⲁϩⲓϣ̣ⲱ[ⲡⲉ <text:line-break/><text:span text:style-name="T1"> </text:span><text:span text:style-name="T2">(57/23) </text:span> [..]ⲙ̣ⲁ̣[ <text:line-break/><text:span text:style-name="T1"> </text:span><text:span text:style-name="T2">(57/24) </text:span> (+-6 lines missing) <text:line-break/><text:span text:style-name="T1"> </text:span><text:span text:style-name="T2">(58/16) </text:span> (+-16 lines missing) <text:line-break/><text:span text:style-name="T1"> </text:span><text:span text:style-name="T2">(58/17) </text:span> [ 16+- ]ⲙ <text:line-break/><text:span text:style-name="T1"> </text:span><text:span text:style-name="T2">(58/18) </text:span> [ 15+- ]. ⲙ̅ <text:line-break/><text:span text:style-name="T1"> </text:span><text:span text:style-name="T2">(58/19) </text:span> [ 11+- ].ϩ̣.[.] ⲛ̣̅ⲛⲁ <text:line-break/><text:span text:style-name="T1"> </text:span><text:span text:style-name="T2">(58/20) </text:span> [ 10+- ]ⲕⲉⲉⲥ ⲛ̅ⲧⲁ̣[ <text:line-break/><text:span text:style-name="T1"> </text:span><text:span text:style-name="T2">(58/21) </text:span> [ 8+- ]. ⲇⲉ ϩⲛ̅ ⲛ̅ⲕ̣ⲟ[ⲥ]‐ <text:line-break/><text:span text:style-name="T1"> </text:span><text:span text:style-name="T2">(58/22) </text:span> [ⲙⲓⲕⲟⲥ.....]ⲛ̣[.] ⲁⲃⲁ̣ⲗ [ <text:line-break/><text:span text:style-name="T1"> </text:span><text:span text:style-name="T2">(58/23) </text:span> [ 14+- ]ⲡ̣[ <text:line-break/><text:span text:style-name="T1"> </text:span><text:span text:style-name="T2">(58/24) </text:span> (+-6 lines missing) <text:line-break/><text:span text:style-name="T1"> </text:span><text:span text:style-name="T2">(61/1) </text:span> [ⲉ]ⲧ̣ϩⲁⲛ̣[....ⲛ]ⲉⲧⲛ̅ϣⲉⲉⲣⲉ ⲉⲩ <text:line-break/><text:soft-page-break/><text:span text:style-name="T1"> </text:span><text:span text:style-name="T2">(61/2) </text:span> [..]ⲙ[1+-]ⲧ̣ⲉ ⲡ̅ⲡⲟ[ <text:line-break/><text:span text:style-name="T1"> </text:span><text:span text:style-name="T2">(61/3) </text:span> [.]ⲓ̣ⲱ̣[ 8+- ]ϫ̣[ⲉ ⲕ]ⲁ̣ⲧⲁ ⲑⲉ . <text:line-break/><text:span text:style-name="T1"> </text:span><text:span text:style-name="T2">(61/4) </text:span> [ 10+- ⲧ]ⲙⲛ̅ⲧⲣ̅ⲣⲟ ⲙ̅[ <text:line-break/><text:span text:style-name="T1"> </text:span><text:span text:style-name="T2">(61/5) </text:span> [ 11+- ] ⲡⲉⲉⲓ ⲇⲉ ⲁϩ[ <text:line-break/><text:span text:style-name="T1"> </text:span><text:span text:style-name="T2">(61/6) </text:span> [ 14+- ].ⲧϥ̅ ⲧ[ <text:line-break/><text:span text:style-name="T1"> </text:span><text:span text:style-name="T2">(61/7) </text:span> (+-4 lines missing) <text:line-break/><text:span text:style-name="T1"> </text:span><text:span text:style-name="T2">(61/11) </text:span> [ 11+- ]ⲛⲁⲡⲟ[ <text:line-break/><text:span text:style-name="T1"> </text:span><text:span text:style-name="T2">(61/12) </text:span> [ 11+- ] ⲛⲓⲙ ⲉⲩ[ <text:line-break/><text:span text:style-name="T1"> </text:span><text:span text:style-name="T2">(61/13) </text:span> [ 12+- ]ⲩⲉ[ <text:line-break/><text:span text:style-name="T1"> </text:span><text:span text:style-name="T2">(61/14) </text:span> (+-16 lines missing) <text:line-break/><text:span text:style-name="T1"> </text:span><text:span text:style-name="T2">(62/1) </text:span> [..]ϫⲉ ϩⲙ̅ ⲡ[ⲉ]ⲧ̣..[.....]ⲁ̣ⲩⲛ[ <text:line-break/><text:span text:style-name="T1"> </text:span><text:span text:style-name="T2">(62/2) </text:span> [.]ⲧ̣ ⲉⲛ· ⲁ̣[ⲩⲱ 9+- ]ⲏⲉ[ <text:line-break/><text:span text:style-name="T1"> </text:span><text:span text:style-name="T2">(62/3) </text:span> [..] ⲅⲁⲣ ⲡⲉ ⲉⲧ̣ⲕ.[ 7+- ]ⲙ̅[ⲡ]‐ <text:line-break/><text:span text:style-name="T1"> </text:span><text:span text:style-name="T2">(62/4) </text:span> [ⲉⲧ]ⲛ̅ⲥⲁⲩⲛⲉ ⲙ̅ⲡ̣[ <text:line-break/><text:span text:style-name="T1"> </text:span><text:span text:style-name="T2">(62/5) </text:span> [..].ⲉⲩ ϫⲉ ⲡⲁ.[ <text:line-break/><text:span text:style-name="T1"> </text:span><text:span text:style-name="T2">(62/6) </text:span> (+-4 lines missing) <text:line-break/><text:span text:style-name="T1"> </text:span><text:span text:style-name="T2">(62/7) </text:span> [ⲕⲁⲧⲁ] ⲙ̣ⲉ̣ⲣ̣[ⲟⲥ <text:line-break/><text:span text:style-name="T1"> </text:span><text:span text:style-name="T2">(62/8) </text:span> [...]ⲧⲉ ϣⲁ̣[ <text:line-break/><text:span text:style-name="T1"> </text:span><text:span text:style-name="T2">(62/9) </text:span> [....]ⲓⲥ.[ <text:line-break/><text:span text:style-name="T1"> </text:span><text:span text:style-name="T2">(62/10) </text:span> [.....].[ <text:line-break/><text:span text:style-name="T1"> </text:span><text:span text:style-name="T2">(62/11) </text:span> (+-16 lines missing) <text:line-break/><text:span text:style-name="T1"> </text:span><text:span text:style-name="T2">(63/1) </text:span> [ 13+- ]. ⲇⲉ ϩⲛ̅ <text:line-break/><text:span text:style-name="T1"> </text:span><text:span text:style-name="T2">(63/2) </text:span> [ 10+- ⲡⲕⲉⲥ]ⲉⲉⲡⲉ <text:line-break/><text:span text:style-name="T1"> </text:span><text:span text:style-name="T2">(63/3) </text:span> [ⲁ]ϩⲣⲏ̣[ⲓ̈...]ⲉ [ⲡ]ⲕ̣ⲁϩ· ⲁ̣[ⲩ]ⲱ ⲁ[ϩ]‐ <text:line-break/><text:span text:style-name="T1"> </text:span><text:span text:style-name="T2">(63/4) </text:span> [ⲟ]ⲩ̣ϣⲉϫ[ⲉ] ⲛ̣̅ⲑⲉ ⲛ̣̅ⲛⲓⲁⲅ̣ⲅ̣ⲉⲗⲟ[ⲥ] <text:line-break/><text:span text:style-name="T1"> </text:span><text:span text:style-name="T2">(63/5) </text:span> [......].ⲉϥⲟⲉⲓ ⲛ̅ⲑⲉ ⲛ̣̅ⲛⲓ‐ <text:line-break/><text:span text:style-name="T1"> </text:span><text:span text:style-name="T2">(63/6) </text:span> [ⲑⲏⲣⲓⲟⲛ ⲛ̅ⲁ]ⲅ̣ⲣⲓⲟⲥ· ⲁⲩ[ⲱ] ⲡ̣ⲁϫⲉϥ <text:line-break/><text:span text:style-name="T1"> </text:span><text:span text:style-name="T2">(63/7) </text:span> [ 8+- ]ⲛ̣[......]ⲁ̣ϩⲉ ⲁ <text:line-break/><text:span text:style-name="T1"> </text:span><text:span text:style-name="T2">(63/8) </text:span> [ 14+- ϣ]ⲁ ⲁⲛⲏ‐ <text:line-break/><text:span text:style-name="T1"> </text:span><text:span text:style-name="T2">(63/9) </text:span> [ϩⲉ 14+- ]ⲑⲏ <text:line-break/><text:span text:style-name="T1"> </text:span><text:span text:style-name="T2">(63/10) </text:span> [ 15+- ]ⲏ̣ⲣⲓ <text:line-break/><text:span text:style-name="T1"> </text:span><text:span text:style-name="T2">(63/11) </text:span> [ 15+- ]ⲉ[ <text:line-break/><text:span text:style-name="T1"> </text:span><text:span text:style-name="T2">(63/12) </text:span> (+-5 lines missing) <text:line-break/><text:span text:style-name="T1"> </text:span><text:span text:style-name="T2">(63/18) </text:span> [ⲁⲃ]ⲁ̣ⲗ̣ ϩⲛ̣̅ ⲁ.[ <text:line-break/><text:span text:style-name="T1"> </text:span><text:span text:style-name="T2">(63/19) </text:span> [..]ⲧⲉ ⲛ̅ⲧⲁⲯ .[ <text:line-break/><text:span text:style-name="T1"> </text:span><text:span text:style-name="T2">(63/20) </text:span> [...]. ⲁϩⲓⲛⲉ̣ⲩ̣ [ⲁ <text:line-break/><text:span text:style-name="T1"> </text:span><text:span text:style-name="T2">(63/21) </text:span> ⲉ̣ϥ..ⲉⲁⲣ.[ <text:line-break/><text:span text:style-name="T1"> </text:span><text:span text:style-name="T2">(63/22) </text:span> ⲁⲩⲱ ⲡⲉϥ[....]ⲛⲉ ⲟⲩϩⲣ[ⲁⲩ <text:line-break/><text:span text:style-name="T1"> </text:span><text:span text:style-name="T2">(63/23) </text:span> [...] ⲁⲩⲱ̣ [...] ⲡ̣ⲉϥ..[ <text:line-break/><text:span text:style-name="T1"> </text:span><text:span text:style-name="T2">(63/24) </text:span> (+-7 lines missing) <text:line-break/><text:span text:style-name="T1"> </text:span><text:span text:style-name="T2">(64/1) </text:span> ⲁⲛⲁⲕ [ 10+- ⲉⲧ]‐ <text:line-break/><text:span text:style-name="T1"> </text:span><text:span text:style-name="T2">(64/2) </text:span> ⲃⲉ ϫ̣[ⲉ] ⲁϩⲓ[ⲛⲉ]ⲩ ⲁ̣[ⲛⲟⲩⲁ]ⲉⲓⲛ̣ <text:line-break/><text:span text:style-name="T1"> </text:span><text:span text:style-name="T2">(64/3) </text:span> ⲧⲏⲣ̣ⲟⲩ ⲉ〈ⲩ〉ⲕⲱⲧⲉ̣ [ⲙ̅ⲙ]ⲁⲉⲓ ⲉⲩ̣[ϫⲉ]‐ <text:line-break/><text:span text:style-name="T1"> </text:span><text:span text:style-name="T2">(64/4) </text:span> ⲣⲟ [ϩⲛ̅] ⲟⲩⲕⲱϩⲧ̅· ⲁ[ⲩⲱ <text:line-break/><text:span text:style-name="T1"> </text:span><text:span text:style-name="T2">(64/5) </text:span> ⲉⲓ ϩ[ⲙ̅] ⲡⲟ̣ⲩⲙⲏⲧⲉ [ <text:line-break/><text:span text:style-name="T1"> </text:span><text:span text:style-name="T2">(64/6) </text:span> ⲙ̅.[.....].[ <text:line-break/><text:span text:style-name="T1"> </text:span><text:span text:style-name="T2">(64/7) </text:span> ⲁ.[ <text:line-break/><text:soft-page-break/><text:span text:style-name="T1"> </text:span><text:span text:style-name="T2">(64/8) </text:span> ⲁ[ <text:line-break/><text:span text:style-name="T1"> </text:span><text:span text:style-name="T2">(64/9) </text:span> ⲧⲙ̣[ <text:line-break/><text:span text:style-name="T1"> </text:span><text:span text:style-name="T2">(64/10) </text:span> (+-6 lines missing) <text:line-break/><text:span text:style-name="T1"> </text:span><text:span text:style-name="T2">(64/16) </text:span> [ 7+- ⲛ̅ⲁⲅ]ⲅ̣ⲉⲗⲟⲥ ⲉ[ⲧ <text:line-break/><text:span text:style-name="T1"> </text:span><text:span text:style-name="T2">(64/17) </text:span> [ 7+- ϩ]ⲁ̣ⲧⲟⲩⲱⲉⲓ· ⲁ̣[ⲩⲱ] <text:line-break/><text:span text:style-name="T1"> </text:span><text:span text:style-name="T2">(64/18) </text:span> [ 10+- ]ⲡ̣ⲟⲩⲉ[ⲉⲓ <text:line-break/><text:span text:style-name="T1"> </text:span><text:span text:style-name="T2">(64/19) </text:span> [...]...ⲏ..[..] ⲛ̅ⲅⲁⲙⲁⲗⲓ‐ <text:line-break/><text:span text:style-name="T1"> </text:span><text:span text:style-name="T2">(64/20) </text:span> [ⲏⲗ· ⲡ]ⲏ̣ ⲉⲧϩⲓϫ[ⲛ̅ ⲙ̅ⲡ]̅ⲛ̣̅̅ⲁ̅ ⲉⲧ[.]. <text:line-break/><text:span text:style-name="T1"> </text:span><text:span text:style-name="T2">(64/21) </text:span> [......]ⲁ̣.[....]ⲟⲥ ⲕ̣[ <text:line-break/><text:span text:style-name="T1"> </text:span><text:span text:style-name="T2">(64/22) </text:span> (+-8 lines missing) <text:line-break/><text:span text:style-name="T1"> </text:span><text:span text:style-name="T2">(65/1) </text:span> [ 9+- ] ⲇ̣ⲉ ⲛ̅ⲁⲅⲅⲉⲗⲟⲥ <text:line-break/><text:span text:style-name="T1"> </text:span><text:span text:style-name="T2">(65/2) </text:span> [ 8+- ⲉ]ⲧ̣ⲣ̣̅ⲡ̣ⲁⲣⲁⲗⲁⲙ‐ <text:line-break/><text:span text:style-name="T1"> </text:span><text:span text:style-name="T2">(65/3) </text:span> [ⲃⲁⲛⲉ ⲙ̅ⲙⲁⲩ ⲧⲏ]ⲣⲟⲩ [ <text:line-break/><text:span text:style-name="T1"> </text:span><text:span text:style-name="T2">(65/4) </text:span> [ 7+- ].· ⲙ̣ⲛ̅ ⲛⲉ̣[ⲧⲟ]ⲩⲡ. <text:line-break/><text:span text:style-name="T1"> </text:span><text:span text:style-name="T2">(65/5) </text:span> [.....ⲁⲩ]ⲱ ⲁ̣ϥϫ[ⲓ ⲙ̅]ⲙⲁⲉⲓ <text:line-break/><text:span text:style-name="T1"> </text:span><text:span text:style-name="T2">(65/6) </text:span> [ 7+- ]ⲏ̣ⲧ ⲁϥ[ϫⲱ]ⲕ̣ ⲙ̅ <text:line-break/><text:span text:style-name="T1"> </text:span><text:span text:style-name="T2">(65/7) </text:span> [ 14+- ]ⲡⲁ <text:line-break/><text:span text:style-name="T1"> </text:span><text:span text:style-name="T2">(65/8) </text:span> [ 15+- ]ϭ̣ⲱ <text:line-break/><text:span text:style-name="T1"> </text:span><text:span text:style-name="T2">(65/9) </text:span> [ 15+- ]ⲩ <text:line-break/><text:span text:style-name="T1"> </text:span><text:span text:style-name="T2">(65/10) </text:span> ( 1 line missing) <text:line-break/><text:span text:style-name="T1"> </text:span><text:span text:style-name="T2">(65/11) </text:span> [ 15+- ]ⲉϥ <text:line-break/><text:span text:style-name="T1"> </text:span><text:span text:style-name="T2">(65/12) </text:span> [ 9+- ⲛⲉ]ⲥ̣ⲙⲉⲗⲟⲥ <text:line-break/><text:span text:style-name="T1"> </text:span><text:span text:style-name="T2">(65/13) </text:span> [ 12+- ]ⲟⲩⲕⲟ <text:line-break/><text:span text:style-name="T1"> </text:span><text:span text:style-name="T2">(65/14) </text:span> [ 12+- ]ⲡⲁϩⲟ‐ <text:line-break/><text:span text:style-name="T1"> </text:span><text:span text:style-name="T2">(65/15) </text:span> [ⲣⲁⲧⲟⲥ 9+- ]ⲉⲓ <text:line-break/><text:span text:style-name="T1"> </text:span><text:span text:style-name="T2">(65/16) </text:span> [ 15+- ]ⲥ· <text:line-break/><text:span text:style-name="T1"> </text:span><text:span text:style-name="T2">(65/17) </text:span> [ 8+- ]ⲕ̣ⲣ[ⲓ]ⲥ[ⲓⲥ ⲉ]ⲓ̣ <text:line-break/><text:span text:style-name="T1"> </text:span><text:span text:style-name="T2">(65/18) </text:span> [ 8+- ]ⲕ̣ⲏⲥ[..]ⲁ̣ ⲛⲏϫ <text:line-break/><text:span text:style-name="T1"> </text:span><text:span text:style-name="T2">(65/19) </text:span> [ 9+- ] ⲛⲓⲙ [ⲉⲧⲕ]ⲏ <text:line-break/><text:span text:style-name="T1"> </text:span><text:span text:style-name="T2">(65/20) </text:span> [ 10+- ]ⲧ̣ⲏ̣[..] ⲙ̅ <text:line-break/><text:span text:style-name="T1"> </text:span><text:span text:style-name="T2">(65/21) </text:span> [ 9+- ⲡ]ⲏⲅ[ⲏ] ⲛ̅ⲁⲧ‐ <text:line-break/><text:span text:style-name="T1"> </text:span><text:span text:style-name="T2">(65/22) </text:span> [ⲙⲟⲩ 7+- ]ⲉ̣ϥⲁⲛ̣ϩ̅· <text:line-break/><text:span text:style-name="T1"> </text:span><text:span text:style-name="T2">(65/23) </text:span> [ 13+- ]ⲡ̣ⲥⲛⲉⲩ <text:line-break/><text:span text:style-name="T1"> </text:span><text:span text:style-name="T2">(65/24) </text:span> [ 11+- ⲕⲁⲣ]ⲱϥ <text:line-break/><text:span text:style-name="T1"> </text:span><text:span text:style-name="T2">(65/25) </text:span> [ 11+- ⲛⲟ]ⲩ̣ⲧⲉ <text:line-break/><text:span text:style-name="T1"> </text:span><text:span text:style-name="T2">(65/26) </text:span> (+-4 lines missing) <text:line-break/><text:span text:style-name="T1"> </text:span><text:span text:style-name="T2">(66/1) </text:span> ϫⲁⲕⲙⲥ̣ ⲁⲃ̣[ⲁⲗ ϩⲛ̅ <text:line-break/><text:span text:style-name="T1"> </text:span><text:span text:style-name="T2">(66/2) </text:span> .ⲉ̣ ⲙ̣̅ⲡⲛ[ⲟⲩⲧⲉ <text:line-break/><text:span text:style-name="T1"> </text:span><text:span text:style-name="T2">(66/3) </text:span> ⲡ̣[ⲉⲛ]ⲧ̣ⲁⲩ[ⲥ]ⲫ[ⲣⲁⲅⲓⲍⲉ ⲙ̅ⲙⲁϥ] <text:line-break/><text:span text:style-name="T1"> </text:span><text:span text:style-name="T2">(66/4) </text:span> ⲁϩ[ⲟⲩ]ⲧ̣ⲥⲁⲉⲓ[ⲁϥ ϩⲛ̅ ⲧⲥⲫⲣⲁ]‐ <text:line-break/><text:span text:style-name="T1"> </text:span><text:span text:style-name="T2">(66/5) </text:span> ⲅⲓ[ⲥ ⲛ̅]ⲧⲡ̣ⲉ· [ <text:line-break/><text:span text:style-name="T1"> </text:span><text:span text:style-name="T2">(66/6) </text:span> ⲛ̅[ <text:line-break/><text:span text:style-name="T1"> </text:span><text:span text:style-name="T2">(66/7) </text:span> ⲉ <text:line-break/><text:span text:style-name="T1"> </text:span><text:span text:style-name="T2">(66/8) </text:span> .[ <text:line-break/><text:span text:style-name="T1"> </text:span><text:span text:style-name="T2">(66/9) </text:span> ⲁ <text:line-break/><text:span text:style-name="T1"> </text:span><text:span text:style-name="T2">(66/10) </text:span> ⲥ[.].[ <text:line-break/><text:span text:style-name="T1"> </text:span><text:span text:style-name="T2">(66/11) </text:span> ⲁⲡⲉϥ̣[ <text:line-break/><text:soft-page-break/><text:span text:style-name="T1"> </text:span><text:span text:style-name="T2">(66/12) </text:span> ⲛⲁϭ [ⲛ̅ <text:line-break/><text:span text:style-name="T1"> </text:span><text:span text:style-name="T2">(66/13) </text:span> ⲧⲟⲩ[ <text:line-break/><text:span text:style-name="T1"> </text:span><text:span text:style-name="T2">(66/14) </text:span> ⲛ̅[ <text:line-break/><text:span text:style-name="T1"> </text:span><text:span text:style-name="T2">(66/15) </text:span> ⲍ[ <text:line-break/><text:span text:style-name="T1"> </text:span><text:span text:style-name="T2">(66/16) </text:span> ⲧⲏⲣ̣[..]..ⲛ̣[ <text:line-break/><text:span text:style-name="T1"> </text:span><text:span text:style-name="T2">(66/17) </text:span> ⲁⲩ[ⲱ ⲁ]ϩⲓⲛⲉ̣[ⲩ <text:line-break/><text:span text:style-name="T1"> </text:span><text:span text:style-name="T2">(66/18) </text:span> ⲧ[...]ⲉⲩ· [ 9+- ⲁ]‐ <text:line-break/><text:span text:style-name="T1"> </text:span><text:span text:style-name="T2">(66/19) </text:span> ⲧⲙ[ⲟ]ⲩ̣ϫ̣[ϭ <text:line-break/><text:span text:style-name="T1"> </text:span><text:span text:style-name="T2">(66/20) </text:span> ⲛⲉ[ⲧ]ⲉ ⲡ[ <text:line-break/><text:span text:style-name="T1"> </text:span><text:span text:style-name="T2">(66/21) </text:span> ⲉⲛ ϣⲁ[ <text:line-break/><text:span text:style-name="T1"> </text:span><text:span text:style-name="T2">(66/22) </text:span> ϭⲱ̣[ <text:line-break/><text:span text:style-name="T1"> </text:span><text:span text:style-name="T2">(66/23) </text:span> ⲛ̅ⲧ[ <text:line-break/><text:span text:style-name="T1"> </text:span><text:span text:style-name="T2">(66/24) </text:span> ⲁϫ̣[ <text:line-break/><text:span text:style-name="T1"> </text:span><text:span text:style-name="T2">(66/25) </text:span> (+-4 lines missing) <text:line-break/><text:span text:style-name="T1"> </text:span><text:span text:style-name="T2">(67/1) </text:span> [ 8+- ] ⲉⲩⲛⲁϣⲱⲡⲉ <text:line-break/><text:span text:style-name="T1"> </text:span><text:span text:style-name="T2">(67/2) </text:span> [ 11+- ] ⲙ̅ⲡⲛⲟⲩ‐ <text:line-break/><text:span text:style-name="T1"> </text:span><text:span text:style-name="T2">(67/3) </text:span> [ⲧⲉ 8+- ]ⲟⲩⲥϩⲓⲙⲉ <text:line-break/><text:span text:style-name="T1"> </text:span><text:span text:style-name="T2">(67/4) </text:span> [ 9+- ] ⲉⲥϩⲛ̣̅ [ⲟ]ⲩⲥⲧⲟ‐ <text:line-break/><text:span text:style-name="T1"> </text:span><text:span text:style-name="T2">(67/5) </text:span> [ⲛⲟⲥ......ⲛ̅ⲧ]ⲉⲣⲉⲥ̣[ϫ]ⲡⲟ <text:line-break/><text:span text:style-name="T1"> </text:span><text:span text:style-name="T2">(67/6) </text:span> [ 10+- ]ϫⲛ̅[.]ⲉ̣ⲩ <text:line-break/><text:span text:style-name="T1"> </text:span><text:span text:style-name="T2">(67/7) </text:span> [ 14+- ]ⲟⲛ <text:line-break/><text:span text:style-name="T1"> </text:span><text:span text:style-name="T2">(67/8) </text:span> [ 14+- ]ⲉⲙ <text:line-break/><text:span text:style-name="T1"> </text:span><text:span text:style-name="T2">(67/9) </text:span> [ 15+- ]ⲏ <text:line-break/><text:span text:style-name="T1"> </text:span><text:span text:style-name="T2">(67/10) </text:span> [ 14+- ]ⲉ ⲙⲛ̅ <text:line-break/><text:span text:style-name="T1"> </text:span><text:span text:style-name="T2">(67/11) </text:span> [ 14+- ]ⲡⲉ <text:line-break/><text:span text:style-name="T1"> </text:span><text:span text:style-name="T2">(67/12) </text:span> [ 11+- ⲧ]ⲏ̣ⲣ̣ⲟ̣ⲩ̣ <text:line-break/><text:span text:style-name="T1"> </text:span><text:span text:style-name="T2">(67/13) </text:span> [ 11+- ]. ⲛ̅ϩⲱⲃ <text:line-break/><text:span text:style-name="T1"> </text:span><text:span text:style-name="T2">(67/14) </text:span> [....] ϩⲛ̅ⲣ̣ⲱ̣ⲙ̣[ⲉ ...]ⲥ· ⲁⲩⲱ <text:line-break/><text:span text:style-name="T1"> </text:span><text:span text:style-name="T2">(67/15) </text:span> [.....] ϩⲛ̅ϩⲓⲁ[ⲙⲉ ⲙⲛ̅ ϩ]ⲛ̣̅ⲣⲱ‐ <text:line-break/><text:span text:style-name="T1"> </text:span><text:span text:style-name="T2">(67/16) </text:span> [ⲙⲉ ⲛ̅ⲧⲉⲉ]ⲓ̣ⲙⲓⲛ[ⲉ.....ⲙ̅]‐ <text:line-break/><text:span text:style-name="T1"> </text:span><text:span text:style-name="T2">(67/17) </text:span> [ⲡⲉⲗ]ⲁ̣ⲁⲩⲉ 〈ⲛ̅〉ⲛⲉ[ⲧϩⲓϫⲙ̅ ⲡ]ⲕⲁϩ <text:line-break/><text:span text:style-name="T1"> </text:span><text:span text:style-name="T2">(67/18) </text:span> [ⲥⲟⲩ]ⲱ̣ⲛⲟⲩ· ϫ̣[ⲉ....]ⲉⲓ <text:line-break/><text:span text:style-name="T1"> </text:span><text:span text:style-name="T2">(67/19) </text:span> [.....]ⲉ ⲛⲓⲙ [......]ⲛⲟⲩ <text:line-break/><text:span text:style-name="T1"> </text:span><text:span text:style-name="T2">(67/20) </text:span> [ⲛ̅ⲥ]ⲉ̣ⲛⲉ̣ⲓ̣ ϩⲁ ⲛⲉⲉⲓ ⲙ[ⲛ̅ ⲙ̅ⲙ]ⲉⲥ <text:line-break/><text:span text:style-name="T1"> </text:span><text:span text:style-name="T2">(67/21) </text:span> [ϩ]ⲛ̣̅ⲏⲉⲓ ϫⲉ ⲛⲉⲉⲓ ⲛⲁ[ϯ ⲉ]ⲥⲟⲩ <text:line-break/><text:span text:style-name="T1"> </text:span><text:span text:style-name="T2">(67/22) </text:span> [....]ⲛⲟⲩⲧⲉ [......]ⲛⲉ <text:line-break/><text:span text:style-name="T1"> </text:span><text:span text:style-name="T2">(67/23) </text:span> [....].[..]ⲟⲧⲟ̣[......] ⲁⲃⲁⲗ <text:line-break/><text:span text:style-name="T1"> </text:span><text:span text:style-name="T2">(67/24) </text:span> [ 7+- ]ⲁ̣ⲓ̣ⲱⲛ [.....]ⲟ̣ⲛ· <text:line-break/><text:span text:style-name="T1"> </text:span><text:span text:style-name="T2">(67/25) </text:span> [ 16+- ]ⲗ̣ <text:line-break/><text:span text:style-name="T1"> </text:span><text:span text:style-name="T2">(67/26) </text:span> (+-4 lines missing) <text:line-break/><text:span text:style-name="T1"> </text:span><text:span text:style-name="T2">(68/1) </text:span> ⲙⲛ̅ ⲛⲉⲧ̣ⲁ[ <text:line-break/><text:span text:style-name="T1"> </text:span><text:span text:style-name="T2">(68/2) </text:span> ⲛ̅ⲧⲁⲩⲡ̣[ <text:line-break/><text:span text:style-name="T1"> </text:span><text:span text:style-name="T2">(68/3) </text:span> ⲡⲛ[ⲟ]ⲩⲧⲉ [ <text:line-break/><text:span text:style-name="T1"> </text:span><text:span text:style-name="T2">(68/4) </text:span> ϫⲓ̣[ⲛ] ⲛ̅ϣ[ⲁⲣⲡ̅ <text:line-break/><text:span text:style-name="T1"> </text:span><text:span text:style-name="T2">(68/5) </text:span> ϩⲙ̣̅ [ⲡ]ⲁⲕⲁ̣[ <text:line-break/><text:span text:style-name="T1"> </text:span><text:span text:style-name="T2">(68/6) </text:span> ϩⲣ̅[ⲧⲉ <text:line-break/><text:span text:style-name="T1"> </text:span><text:span text:style-name="T2">(68/7) </text:span> ⲉ[ <text:line-break/><text:soft-page-break/><text:span text:style-name="T1"> </text:span><text:span text:style-name="T2">(68/8) </text:span> ⲣⲉ̣[ⲛ <text:line-break/><text:span text:style-name="T1"> </text:span><text:span text:style-name="T2">(68/9) </text:span> ⲧⲟⲩ[ <text:line-break/><text:span text:style-name="T1"> </text:span><text:span text:style-name="T2">(68/10) </text:span> ⲧ̣[ <text:line-break/><text:span text:style-name="T1"> </text:span><text:span text:style-name="T2">(68/11) </text:span> ⲛ̅ⲇⲓⲁ[ 12+- ⲙⲩ] <text:line-break/><text:span text:style-name="T1"> </text:span><text:span text:style-name="T2">(68/12) </text:span> ⲥⲧⲏⲣ[ⲓⲟⲛ <text:line-break/><text:span text:style-name="T1"> </text:span><text:span text:style-name="T2">(68/13) </text:span> ⲛ̅ⲧ.[.....].ϩⲙ̣̅ [ <text:line-break/><text:span text:style-name="T1"> </text:span><text:span text:style-name="T2">(68/14) </text:span> [......ⲛ]ⲟⲩⲧⲉ ⲁ[ <text:line-break/><text:span text:style-name="T1"> </text:span><text:span text:style-name="T2">(68/15) </text:span> ..[.....]ϥ̣ϫⲟ.[ <text:line-break/><text:span text:style-name="T1"> </text:span><text:span text:style-name="T2">(68/16) </text:span> ⲧⲉ.[...ⲟ]ⲩⲁⲛϩ̣ ⲁ̣[ⲃⲁⲗ̣ <text:line-break/><text:span text:style-name="T1"> </text:span><text:span text:style-name="T2">(68/17) </text:span> ⲧ[......]ⲛⲉⲧⲁⲥⲁⲩ[ⲛⲉ ⲙ̅ⲙⲁϥ] <text:line-break/><text:span text:style-name="T1"> </text:span><text:span text:style-name="T2">(68/18) </text:span> ʹ26[ⲙ]ⲁ̣ⲣ̣ⲥ̣ⲁⲛⲏⲥʹ26 </text:p>
      <text:p text:style-name="P1"/>
      <text:p text:style-name="P3">( codex X ) fragments</text:p>
      <text:p text:style-name="P2"><text:span text:style-name="T1"> </text:span><text:span text:style-name="T2">(0/1) </text:span> 1 1 ]ⲁϥ <text:line-break/><text:span text:style-name="T1"> </text:span><text:span text:style-name="T2">(0/2) </text:span> ]ⲝⲟⲩ <text:line-break/><text:span text:style-name="T1"> </text:span><text:span text:style-name="T2">(0/3) </text:span> 1 2 ⲟⲡ̣[ <text:line-break/><text:span text:style-name="T1"> </text:span><text:span text:style-name="T2">(0/4) </text:span> ⲧ̣ⲟ̣[ <text:line-break/><text:span text:style-name="T1"> </text:span><text:span text:style-name="T2">(0/5) </text:span> 2 1 ]ⲣ..[ <text:line-break/><text:span text:style-name="T1"> </text:span><text:span text:style-name="T2">(0/6) </text:span> ⲙ̅]ⲙⲉⲩ· [ <text:line-break/><text:span text:style-name="T1"> </text:span><text:span text:style-name="T2">(0/7) </text:span> ][ <text:line-break/><text:span text:style-name="T1"> </text:span><text:span text:style-name="T2">(0/8) </text:span> 2 2 ⲁⲩ]ⲱ ⲛ̅ⲟⲓ[ <text:line-break/><text:span text:style-name="T1"> </text:span><text:span text:style-name="T2">(0/9) </text:span> ]ⲟ ⲛ̅ⲛ̅ⲅ̣[ <text:line-break/><text:span text:style-name="T1"> </text:span><text:span text:style-name="T2">(0/10) </text:span> 3 1 ⲁⲩ]ⲱ̣ ⲥⲉⲛⲁ̣[ <text:line-break/><text:span text:style-name="T1"> </text:span><text:span text:style-name="T2">(0/11) </text:span> ] ⲱ[ <text:line-break/><text:span text:style-name="T1"> </text:span><text:span text:style-name="T2">(0/12) </text:span> 3 2 ]ⲙⲛ̅ ⲉⲓ[ <text:line-break/><text:span text:style-name="T1"> </text:span><text:span text:style-name="T2">(0/13) </text:span> ]ϣⲟⲟ̣[ⲡ <text:line-break/><text:span text:style-name="T1"> </text:span><text:span text:style-name="T2">(0/14) </text:span> 4 1 ]ⲉ[ <text:line-break/><text:span text:style-name="T1"> </text:span><text:span text:style-name="T2">(0/15) </text:span> ]ⲡ̣ⲁⲗⲓⲛ [ <text:line-break/><text:span text:style-name="T1"> </text:span><text:span text:style-name="T2">(0/16) </text:span> ]ϣⲡ[ <text:line-break/><text:span text:style-name="T1"> </text:span><text:span text:style-name="T2">(0/17) </text:span> 4 2 ]ⲡ̣ⲉⲧ̣[ <text:line-break/><text:span text:style-name="T1"> </text:span><text:span text:style-name="T2">(0/18) </text:span> ]ⲛ̣̅ϭⲁⲙ [ <text:line-break/><text:span text:style-name="T1"> </text:span><text:span text:style-name="T2">(0/19) </text:span> ][ <text:line-break/><text:span text:style-name="T1"> </text:span><text:span text:style-name="T2">(0/20) </text:span> 5 1 ]ϣⲟⲟⲡ̣ [ <text:line-break/><text:span text:style-name="T1"> </text:span><text:span text:style-name="T2">(0/21) </text:span> ]ϣ̣ⲁⲛ̣[ <text:line-break/><text:span text:style-name="T1"> </text:span><text:span text:style-name="T2">(0/22) </text:span> 5 2 ]ⲣ̣ⲛ̣.[ <text:line-break/><text:span text:style-name="T1"> </text:span><text:span text:style-name="T2">(0/23) </text:span> ]ⲛ̅ⲧⲁϥ̣[ <text:line-break/><text:span text:style-name="T1"> </text:span><text:span text:style-name="T2">(0/24) </text:span> 6 1 ]ⲣ̣[ <text:line-break/><text:span text:style-name="T1"> </text:span><text:span text:style-name="T2">(0/25) </text:span> ] ⲛ̅ⲛ̅[ <text:line-break/><text:span text:style-name="T1"> </text:span><text:span text:style-name="T2">(0/26) </text:span> ][ <text:line-break/><text:span text:style-name="T1"> </text:span><text:span text:style-name="T2">(0/27) </text:span> 6 2 ϣⲟ]ⲟⲡ ϩ[ⲛ̅ <text:line-break/><text:span text:style-name="T1"> </text:span><text:span text:style-name="T2">(0/28) </text:span> ]ⲱ[ <text:line-break/><text:span text:style-name="T1"> </text:span><text:span text:style-name="T2">(0/29) </text:span> 7 1 ]ⲱ̣ ⲉⲙ[ <text:line-break/><text:span text:style-name="T1"> </text:span><text:span text:style-name="T2">(0/30) </text:span> ]ⲙ[ <text:line-break/><text:span text:style-name="T1"> </text:span><text:span text:style-name="T2">(0/31) </text:span> ][̅ <text:line-break/><text:span text:style-name="T1"> </text:span><text:span text:style-name="T2">(0/32) </text:span> 7 2 ]ⲱ ⲁ[ <text:line-break/><text:span text:style-name="T1"> </text:span><text:span text:style-name="T2">(0/33) </text:span> ⲁ]ⲩⲱ [ <text:line-break/><text:span text:style-name="T1"> </text:span><text:span text:style-name="T2">(0/34) </text:span> ]ⲉⲁ̣[ <text:line-break/><text:span text:style-name="T1"> </text:span><text:span text:style-name="T2">(0/35) </text:span> 8 1 ⲁ[ <text:line-break/><text:span text:style-name="T1"> </text:span><text:span text:style-name="T2">(0/36) </text:span> ⲟⲩ[ <text:line-break/><text:span text:style-name="T1"> </text:span><text:span text:style-name="T2">(0/37) </text:span> 8 2 ]ⲟⲩ <text:line-break/><text:span text:style-name="T1"> </text:span><text:span text:style-name="T2">(0/38) </text:span> ]ⲉⲓⲛⲉ· <text:line-break/><text:span text:style-name="T1"> </text:span><text:span text:style-name="T2">(0/39) </text:span> 9 1 ]ⲁⲡ̣ⲉ[ <text:line-break/><text:span text:style-name="T1"> </text:span><text:span text:style-name="T2">(0/40) </text:span> ]ⲉⲩⲉ̣[ <text:line-break/><text:span text:style-name="T1"> </text:span><text:span text:style-name="T2">(0/41) </text:span> 9 2 ]ⲙ[.]ⲡ[ <text:line-break/><text:span text:style-name="T1"> </text:span><text:span text:style-name="T2">(0/42) </text:span> ]ⲩⲕⲁⲣ[ <text:line-break/><text:span text:style-name="T1"> </text:span><text:span text:style-name="T2">(0/43) </text:span> 10 1 []ϣ[ <text:line-break/><text:span text:style-name="T1"> </text:span><text:span text:style-name="T2">(0/44) </text:span> ⲁϩ̣ⲟ̣[ <text:line-break/><text:span text:style-name="T1"> </text:span><text:span text:style-name="T2">(0/45) </text:span> 10 2 ]ϫⲉ <text:line-break/><text:span text:style-name="T1"> </text:span><text:span text:style-name="T2">(0/46) </text:span> ]ⲛ̣̅ⲥⲱⲙ[ⲁ] <text:line-break/><text:span text:style-name="T1"> </text:span><text:span text:style-name="T2">(0/47) </text:span> 12 1 ]ⲉⲓⲉ[ <text:line-break/><text:soft-page-break/><text:span text:style-name="T1"> </text:span><text:span text:style-name="T2">(0/48) </text:span> ]ϣⲉ[ <text:line-break/><text:span text:style-name="T1"> </text:span><text:span text:style-name="T2">(0/49) </text:span> 12 2 ].[ <text:line-break/><text:span text:style-name="T1"> </text:span><text:span text:style-name="T2">(0/50) </text:span> ⲁ]ⲩⲱ [ <text:line-break/><text:span text:style-name="T1"> </text:span><text:span text:style-name="T2">(0/51) </text:span> ]ⲙ̣̅ⲡ̣[ <text:line-break/><text:span text:style-name="T1"> </text:span><text:span text:style-name="T2">(0/52) </text:span> 14 1 ϣⲟ]ⲟⲡ ⲛ̅ⲁ̣[ <text:line-break/><text:span text:style-name="T1"> </text:span><text:span text:style-name="T2">(0/53) </text:span> ]ⲛⲁ[ <text:line-break/><text:span text:style-name="T1"> </text:span><text:span text:style-name="T2">(0/54) </text:span> 14 2 ][..]ϣ̣[ <text:line-break/><text:span text:style-name="T1"> </text:span><text:span text:style-name="T2">(0/55) </text:span> ⲁ]ⲃⲁⲗ ϫ[ⲉ <text:line-break/><text:span text:style-name="T1"> </text:span><text:span text:style-name="T2">(0/56) </text:span> ][ <text:line-break/><text:span text:style-name="T1"> </text:span><text:span text:style-name="T2">(0/57) </text:span> 15 1 ]ⲛ[ <text:line-break/><text:span text:style-name="T1"> </text:span><text:span text:style-name="T2">(0/58) </text:span> ]ⲟⲥ ⲟ[ <text:line-break/><text:span text:style-name="T1"> </text:span><text:span text:style-name="T2">(0/59) </text:span> ]ⲁ̣ⲓ̣ⲱ̣[ⲛ <text:line-break/><text:span text:style-name="T1"> </text:span><text:span text:style-name="T2">(0/60) </text:span> 15 2 ]ⲟ̣ⲩⲛ[ <text:line-break/><text:span text:style-name="T1"> </text:span><text:span text:style-name="T2">(0/61) </text:span> ]ⲛ̣ ⲅⲁⲣ [ <text:line-break/><text:span text:style-name="T1"> </text:span><text:span text:style-name="T2">(0/62) </text:span> 44 1 ][ <text:line-break/><text:span text:style-name="T1"> </text:span><text:span text:style-name="T2">(0/63) </text:span> ]ⲇⲉ[ <text:line-break/><text:span text:style-name="T1"> </text:span><text:span text:style-name="T2">(0/64) </text:span> 44 2 ]..ⲁ̣.[ <text:line-break/><text:span text:style-name="T1"> </text:span><text:span text:style-name="T2">(0/65) </text:span> ]ⲛ̅ⲧⲉ[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4:25:49.142167300</meta:creation-date>
    <dc:date>2026-03-24T14:26:55.406440900</dc:date>
    <meta:editing-duration>PT1M6S</meta:editing-duration>
    <meta:editing-cycles>1</meta:editing-cycles>
    <meta:document-statistic meta:table-count="0" meta:image-count="0" meta:object-count="0" meta:page-count="28" meta:paragraph-count="4" meta:word-count="5121" meta:character-count="36346" meta:non-whitespace-character-count="27476"/>
    <meta:generator>LibreOffice/26.2.1.2$Windows_X86_64 LibreOffice_project/620$Build-2</meta:generator>
  </office:meta>
</office:document-meta>
</file>