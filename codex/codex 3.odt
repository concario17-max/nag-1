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II ) The Apocryphon of John</text:p>
      <text:p text:style-name="P2"><text:span text:style-name="T1"> </text:span><text:span text:style-name="T2">(0/1) </text:span> 1[ϯiϯle paϭe) ⲡ̅ⲁ̅ⲡⲟⲕ̅ⲣ̅ⲩⲫ̅ⲟ̅ⲛ̅ <text:line-break/><text:span text:style-name="T1"> </text:span><text:span text:style-name="T2">(0/2) </text:span> 1[ϯiϯle paϭe) ⲛ̅ ⲓ̅ⲱ̅ϩ̅ⲁⲛⲛ̅ⲏ̅ⲥ̅ <text:line-break/><text:span text:style-name="T1"> </text:span><text:span text:style-name="T2">(1/15) </text:span> [ ⲁⲩⲱ] ⲁⲫⲕ̣[ⲧⲱⲧⲛ̅ ⲉⲃⲟⲗ ϩⲛ̅] <text:line-break/><text:span text:style-name="T1"> </text:span><text:span text:style-name="T2">(1/16) </text:span> [ⲙ̅ⲡⲁⲣⲁ]ⲇ̣ⲟⲥⲓⲥ [ⲛ̅ⲧⲉ ⲛⲉⲧⲛ̅ⲉⲓⲟⲧⲉ] <text:line-break/><text:span text:style-name="T1"> </text:span><text:span text:style-name="T2">(1/17) </text:span> [ⲛ̅ⲧⲁⲣⲉ]ⲓⲥⲱⲧⲙ̅ ⲉ̣[ⲛⲁⲓ̈ ⲁⲓ̈ⲕⲟⲧ ⲉⲃⲟⲗ] <text:line-break/><text:span text:style-name="T1"> </text:span><text:span text:style-name="T2">(1/18) </text:span> [ϩⲙ̅ ⲫⲓ]ⲉⲣⲟⲛ ⲉⲩⲙ[ⲁ ⲛ̅ϫⲁⲉⲓⲉ ⲁⲩⲱ ⲁⲓ̈]‐ <text:line-break/><text:span text:style-name="T1"> </text:span><text:span text:style-name="T2">(1/19) </text:span> [ⲣ̅ⲗⲩⲡ]ⲉⲓ ⲛ̣ⲡ̣ⲓⲉ.[ <text:line-break/><text:span text:style-name="T1"> </text:span><text:span text:style-name="T2">(1/20) </text:span> [ ⲉⲓ]ϫⲱ ⲙ̅ⲙ[ⲟⲥ <text:line-break/><text:span text:style-name="T1"> </text:span><text:span text:style-name="T2">(1/21) </text:span> [ ].[ <text:line-break/><text:span text:style-name="T1"> </text:span><text:span text:style-name="T2">(2/15) </text:span> [ ].ⲗ.[ <text:line-break/><text:span text:style-name="T1"> </text:span><text:span text:style-name="T2">(2/16) </text:span> [ ⲛ]ⲑⲉ ⲛ̅ⲟ[ⲩ <text:line-break/><text:span text:style-name="T1"> </text:span><text:span text:style-name="T2">(2/17) </text:span> [ ]ⲧⲁⲧⲟ ⲛ̅ⲙ[ⲟⲣⲫⲏ] <text:line-break/><text:span text:style-name="T1"> </text:span><text:span text:style-name="T2">(2/18) </text:span> [ ]ⲛ ⲉⲛⲙⲟⲣⲫ[ⲏ <text:line-break/><text:span text:style-name="T1"> </text:span><text:span text:style-name="T2">(2/19) </text:span> [ ]ⲉ ϩⲓⲧⲛ̅ ⲛⲟⲩ̣[ⲉⲣⲏⲩ] <text:line-break/><text:span text:style-name="T1"> </text:span><text:span text:style-name="T2">(2/20) </text:span> [ ]. ⲙ̅ⲙⲏⲉ ⲧⲉ[ <text:line-break/><text:span text:style-name="T1"> </text:span><text:span text:style-name="T2">(2/21) </text:span> [ ]ⲉⲩ[ <text:line-break/><text:span text:style-name="T1"> </text:span><text:span text:style-name="T2">(2/22) </text:span> (Pages 3-4 are too fragmentary.) <text:line-break/><text:span text:style-name="T1"> </text:span><text:span text:style-name="T2">(5/1) </text:span> [ⲛ̅ϭⲓ ⲡⲉⲧϣⲟⲟⲡ ϩⲁⲧⲉ]ϥ̣ϩ̣ⲏ̣ ⲉϯ ⲣⲁⲛ <text:line-break/><text:span text:style-name="T1"> </text:span><text:span text:style-name="T2">(5/2) </text:span> [ⲉⲣⲟϥ ⲡⲁⲓ̈ ⲡⲉ ⲡⲟⲩⲟⲉⲓ]ⲛ̣ ⲛ̅ⲁⲙⲉⲧⲣⲏ‐ <text:line-break/><text:span text:style-name="T1"> </text:span><text:span text:style-name="T2">(5/3) </text:span> [ⲧⲟⲛ ⲡⲓⲧⲃ̅ⲃⲟ ⲉⲧⲟⲩⲁⲁⲃ] ⲛ̅ⲕⲁⲑⲁ‐ <text:line-break/><text:span text:style-name="T1"> </text:span><text:span text:style-name="T2">(5/4) </text:span> [ⲣⲟⲛ ⲡⲓⲁⲧϣⲁϫⲉ ⲉⲣⲟϥ ⲉ]ⲧ̣ϫⲏⲕ ⲉⲃⲟⲗ <text:line-break/><text:span text:style-name="T1"> </text:span><text:span text:style-name="T2">(5/5) </text:span> [ⲛ̅ⲁⲧⲧⲁⲕⲟ ⲟⲩⲇⲉ ⲛ̅ⲟⲩⲙ̅ⲛ̅ⲧ̅]ⲧ̣ⲉⲗⲓⲟⲥ <text:line-break/><text:span text:style-name="T1"> </text:span><text:span text:style-name="T2">(5/6) </text:span> [ⲁⲛ ⲡⲉ ⲟⲩⲇⲉ ⲛ̅ⲟⲩⲙ̅ⲛ̅ⲧ̅ⲙⲁⲕⲁⲣⲓⲟ]ⲥ̣ ⲁⲛ ⲡⲉ <text:line-break/><text:span text:style-name="T1"> </text:span><text:span text:style-name="T2">(5/7) </text:span> [ⲛ̅ⲟⲩⲙ̅ⲛ̅ⲧ̅ⲛⲟⲩⲧⲉ]ⲁ̣ⲛ ⲡⲉ ⲁⲗⲗⲁ ⲟⲩϩⲱⲃ <text:line-break/><text:span text:style-name="T1"> </text:span><text:span text:style-name="T2">(5/8) </text:span> [ⲉϥⲥⲟⲧⲡ ⲛ̅ϩⲟⲩⲟ] ⲡⲉ ⲛ̅ⲟⲩⲁⲡⲓⲣⲟⲥ ⲁⲛ <text:line-break/><text:span text:style-name="T1"> </text:span><text:span text:style-name="T2">(5/9) </text:span> [ⲡⲉ ⲛ̅ⲟⲩⲁⲧϯⲧⲱϣ] ⲉⲣⲟϥ ⲡⲉ ⲁⲗⲗⲁ ⲟⲩ‐ <text:line-break/><text:span text:style-name="T1"> </text:span><text:span text:style-name="T2">(5/10) </text:span> [ϩⲱⲃ ⲉϥⲥⲟⲧⲡ ⲡ]ⲉ̣ ⲛ̅ⲟⲩⲥⲱⲙⲁⲧⲓⲕⲟⲥ <text:line-break/><text:span text:style-name="T1"> </text:span><text:span text:style-name="T2">(5/11) </text:span> [ⲁⲛ ⲡⲉ ⲛ̅ⲟⲩⲁⲧ]ⲥ̣ⲱ̣ⲙⲁ ⲁⲛ ⲡⲉ ⲛ̅ⲟⲩ‐ <text:line-break/><text:span text:style-name="T1"> </text:span><text:span text:style-name="T2">(5/12) </text:span> [ⲛⲟϭ ⲁⲛ] ⲡ̣ⲉ̣ ⲛ̣̅ⲟⲩⲕⲟⲩⲉⲓ ⲁⲛ ⲡⲉ ⲛ̅‐ <text:line-break/><text:span text:style-name="T1"> </text:span><text:span text:style-name="T2">(5/13) </text:span> [ⲟⲩⲏ]ⲣ̣ ⲁ̣ⲛ ⲡⲉ ⲛ̅ⲟⲩⲧⲁⲙⲓⲟ ⲉⲛ ⲡⲉ <text:line-break/><text:span text:style-name="T1"> </text:span><text:span text:style-name="T2">(5/14) </text:span> [ⲛ̅ⲟⲩ]ⲧ̣ⲉⲉⲓⲙⲓⲛⲉ ⲁⲛ ⲡⲉ ϩⲟⲗⲱⲥ <text:line-break/><text:span text:style-name="T1"> </text:span><text:span text:style-name="T2">(5/15) </text:span> ⲙ̣̅̅ⲛ̣̅̅ ϣϭⲟⲙ ⲉⲧⲣⲉ ⲗⲁⲁⲩ ⲛⲟⲉⲓⲉ ⲙ̅ⲙⲟϥ <text:line-break/><text:span text:style-name="T1"> </text:span><text:span text:style-name="T2">(5/16) </text:span> ⲛ̣̅ⲟⲩⲗⲁⲁⲩ ⲁⲛ ⲡⲉ ⲛ̅ⲧⲉ ⲛⲉⲧϣⲟⲟⲡ <text:line-break/><text:span text:style-name="T1"> </text:span><text:span text:style-name="T2">(5/17) </text:span> ⲁⲗⲗⲁ ⲟⲩϩⲱⲃ ⲉϥⲥⲟⲧⲡ ⲡⲉ ⲟⲩⲭ ⲱⲥ <text:line-break/><text:span text:style-name="T1"> </text:span><text:span text:style-name="T2">(5/18) </text:span> ϫⲉ ⲉϥⲥⲁⲧⲡ· ⲁⲗⲗⲁ ⲡⲉⲧⲉ ⲡⲱϥ ⲡⲉ ⲙ̅‐ <text:line-break/><text:span text:style-name="T1"> </text:span><text:span text:style-name="T2">(5/19) </text:span> ⲡ̅ϥ̅ⲙⲉⲧⲉⲭⲉ ⲙ̅ⲛ̅ ⲛⲁⲓⲱⲛ· ⲙ̅ⲙ̅ⲛ̅ <text:line-break/><text:span text:style-name="T1"> </text:span><text:span text:style-name="T2">(5/20) </text:span> ⲭⲣⲟⲛⲟⲥ ϣⲟⲟⲡ· ⲛⲁϥ ⲡⲉⲧⲙⲉⲧⲉ <text:line-break/><text:span text:style-name="T1"> </text:span><text:span text:style-name="T2">(5/21) </text:span> ⲭⲉ ⲅⲁⲣ ⲉⲩⲁⲓⲱⲛ ϩⲓⲉ ⲕⲉⲟⲩⲁ ⲡⲉ ⲛ̅ⲧⲁϥ <text:line-break/><text:span text:style-name="T1"> </text:span><text:span text:style-name="T2">(5/22) </text:span> ϣ̣̅̅ⲣ̣̅̅ⲡⲛ̅ⲥ̅ⲃ̅ⲧⲱⲧ̅ϥ̅· ⲙ̅ⲙ̅ⲛ̅ ⲟⲩⲟⲉⲓϣ ϩⲟ‐ <text:line-break/><text:span text:style-name="T1"> </text:span><text:span text:style-name="T2">(5/23) </text:span> [ⲣⲓ]ⲍ̣ⲉ ⲛⲁϥ ϩⲱⲥ ⲉϥϫⲓ ⲁⲛ ϩⲓⲧ̅ⲛ̅ ⲕⲉⲟⲩⲉ <text:line-break/><text:span text:style-name="T1"> </text:span><text:span text:style-name="T2">(6/1) </text:span> ⲟⲩⲁⲧϣⲱ̣[ⲱⲧ ⲡⲉ ⲙ̅ⲛ̅ ⲗⲁⲁⲩ ϣⲟⲟⲡ ϩⲁⲧⲉϥ] <text:line-break/><text:span text:style-name="T1"> </text:span><text:span text:style-name="T2">(6/2) </text:span> ⲉϩⲏ ϫⲉ ⲉϥ[ϣⲟⲟⲡ ⲉϥⲁⲓⲧⲓ ⲙ̅ⲙⲟϥ] <text:line-break/><text:span text:style-name="T1"> </text:span><text:span text:style-name="T2">(6/3) </text:span> ⲙ̅ⲙⲓⲛ ⲙ̅ⲙⲟ[ϥ ϩ̅ⲙ̅ ⲡϫⲱⲕ ⲙ̅ⲡⲟⲩⲟⲉⲓⲛ ⲉϥⲣ̅]‐ <text:line-break/><text:span text:style-name="T1"> </text:span><text:span text:style-name="T2">(6/4) </text:span> ⲛⲟⲉⲓ ϩ̅ⲙ̣̅̅ [ⲡⲟⲩⲟⲉⲓⲛ ⲛ̅ⲁⲕⲉⲣⲟⲛ ϯⲙ̅ⲛⲧ̅]‐ <text:line-break/><text:span text:style-name="T1"> </text:span><text:span text:style-name="T2">(6/5) </text:span> ⲛⲟϭ ⲛ̅ⲁⲧϣ[ⲓⲧ̅ⲥ̅ ⲡϣⲁ ⲉⲛⲉϩ ⲡⲣⲉϥϯ ⲛ̅]‐ <text:line-break/><text:span text:style-name="T1"> </text:span><text:span text:style-name="T2">(6/6) </text:span> ⲧⲙ̅ⲛ̅ⲧ̅ϣ̣[ⲁ ⲉⲛⲉϩ ⲡⲟⲩⲟⲉⲓⲛ ⲡⲣⲉϥϯ] <text:line-break/><text:span text:style-name="T1"> </text:span><text:span text:style-name="T2">(6/7) </text:span> ⲡⲟⲩⲟⲉⲓⲛ̣ ⲡ̣[ⲱ]ⲛ̣ϩ̣ [ⲡⲣⲉϥϯ ⲱⲛϩ] <text:line-break/><text:soft-page-break/><text:span text:style-name="T1"> </text:span><text:span text:style-name="T2">(6/8) </text:span> ⲡⲙⲁⲕⲁⲣⲓⲟⲥ ⲡⲣⲉ[ϥϯ ⲛ̅ⲧⲙ̅ⲛ̅ⲧ̅ⲙⲁⲕⲁ]‐ <text:line-break/><text:span text:style-name="T1"> </text:span><text:span text:style-name="T2">(6/9) </text:span> ⲣⲓⲟⲥ ⲡⲥⲟⲟⲩⲛ ⲡ[ⲣⲉϥϯ ⲥⲟⲟⲩⲛ ⲡⲁ]‐ <text:line-break/><text:span text:style-name="T1"> </text:span><text:span text:style-name="T2">(6/10) </text:span> ⲅⲁⲑⲟⲥ ⲉϯⲣⲉ ⲛ̅ⲡⲁ̣[‐ⲅⲁⲑⲟⲛ ⲛ̅ⲟⲩⲟⲉⲓϣ] <text:line-break/><text:span text:style-name="T1"> </text:span><text:span text:style-name="T2">(6/11) </text:span> ⲛⲓⲙ· ⲟⲩⲭ ⲟⲓⲟⲛ ϫⲉ ⲟ̣[ⲩ̅ⲛ̅ⲧⲁϥ ⲁⲗⲗⲁ ϩⲟⲓⲟⲛ <text:line-break/><text:span text:style-name="T1"> </text:span><text:span text:style-name="T2">(6/12) </text:span> ϫⲉ ⲫϯ· ⲙ̅ⲡⲉϩⲙⲟⲧ ⲡ̣[ⲉϩⲙⲟⲧ ⲉⲧϯ ϩⲙⲟⲧ <text:line-break/><text:span text:style-name="T1"> </text:span><text:span text:style-name="T2">(6/13) </text:span> ⲡⲟⲩⲟⲉⲓⲛ ⲛ̅ⲁⲙⲉⲧⲣⲏⲧⲟⲛ ⲟ̣ⲩ̣ [ⲡⲉ ϯ]‐ <text:line-break/><text:span text:style-name="T1"> </text:span><text:span text:style-name="T2">(6/14) </text:span> ⲛⲁϫⲟⲟϥ ⲛⲁⲕ ⲉⲧⲃⲉ ⲡⲓⲁⲧⲧ̣[ⲁϩⲟϥ ⲉ]‐ <text:line-break/><text:span text:style-name="T1"> </text:span><text:span text:style-name="T2">(6/15) </text:span> ⲧⲙ̅ⲙⲁⲩ ⲡⲁⲓ̈ ⲡⲉ ⲡⲉⲓⲛⲉ ⲛ̅ⲡ̣[ⲩⲟⲉⲓⲛ] <text:line-break/><text:span text:style-name="T1"> </text:span><text:span text:style-name="T2">(6/16) </text:span> ⲕⲁⲧⲁ ⲑⲉ ⲉϯⲛⲁⲉϣ ⲛⲟⲉⲓ ⲙ̅ⲙⲟⲥ [ⲛⲓⲙ] <text:line-break/><text:span text:style-name="T1"> </text:span><text:span text:style-name="T2">(6/17) </text:span> ⲅⲁⲣ ⲉⲣ̅ⲛⲟⲉⲓ ⲙ̅ⲙⲟϥ ⲉⲛⲉϩ ϯⲛⲁϫⲟ‐ <text:line-break/><text:span text:style-name="T1"> </text:span><text:span text:style-name="T2">(6/18) </text:span> ⲟⲥ ⲉⲣⲟⲕ ⲕⲁⲧⲁ ⲑⲉ ⲉϯⲛⲁⲉϣ ⲛⲟⲉⲓ ⲙ̅ⲙⲟϥ <text:line-break/><text:span text:style-name="T1"> </text:span><text:span text:style-name="T2">(6/19) </text:span> ϯⲛⲁϫⲟⲟⲥ ⲡⲉϥⲁⲓⲱⲛ ⲟⲩⲁⲫⲑⲁⲣⲧⲟⲥ ⲡⲉ <text:line-break/><text:span text:style-name="T1"> </text:span><text:span text:style-name="T2">(6/20) </text:span> ⲉϥϩⲁⲣⲕ ⲉϥⲙ̅ⲧⲁⲛ ⲙ̅ⲙⲟϥ ϩ̅ⲙ̅ ⲡⲓⲕⲁⲣⲱϥ <text:line-break/><text:span text:style-name="T1"> </text:span><text:span text:style-name="T2">(6/21) </text:span> ⲡⲉⲧϣⲟⲟⲡ· ϩⲁⲑⲏ ⲛ̅ⲛ̅ⲕⲉ ⲛⲓⲙ ⲧⲁⲡⲉ <text:line-break/><text:span text:style-name="T1"> </text:span><text:span text:style-name="T2">(6/22) </text:span> ⲛ̅ⲁⲓⲱⲛ ⲧⲏⲣⲟⲩ ϫⲉ ⲧⲉϥⲙ̅ⲛ̅ⲧ̅ⲁⲅⲁⲑⲟⲥⲭⲟ‐ <text:line-break/><text:span text:style-name="T1"> </text:span><text:span text:style-name="T2">(6/23) </text:span> ⲣⲏⲅⲉⲓ ⲛ̅ⲁⲓⲱⲛ ⲧⲏⲣⲟⲩ ⲉϣⲱⲡⲉ ⲉⲩⲛ‐ <text:line-break/><text:span text:style-name="T1"> </text:span><text:span text:style-name="T2">(6/24) </text:span> ⲗⲁⲁⲩ ϩⲁⲧⲏϥ ⲙ̅ⲛ̅ ⲗⲁⲁⲩ ⲙ̅ⲙⲟⲛ ⲥⲟⲟⲩⲛ̣ <text:line-break/><text:span text:style-name="T1"> </text:span><text:span text:style-name="T2">(6/25) </text:span> ⲛ̅ⲛⲁ ⲡⲓⲁⲧϣⲓⲧ̅ϥ̅ ⲉⲧⲙ̅ⲙⲁⲩ ⲉⲓⲙⲏ[ⲧⲓ] <text:line-break/><text:span text:style-name="T1"> </text:span><text:span text:style-name="T2">(7/1) </text:span> [ⲉⲡⲉⲛⲧⲁϥⲟⲩⲱϩ ⲛ̅ϩⲏⲧϥ ⲉⲧⲙ̅]ⲙⲁⲩ ⲡⲉ ⲛ̅ⲧⲁϥ <text:line-break/><text:span text:style-name="T1"> </text:span><text:span text:style-name="T2">(7/2) </text:span> [ϫⲉ ⲛⲁⲓ̈ ⲉⲣⲟⲛ ⲛ̅ⲧⲟϥ ⲉⲧ]ⲛ̣ⲟⲉⲓ ⲛ̅ⲙⲟϥ ⲙ̅‐ <text:line-break/><text:span text:style-name="T1"> </text:span><text:span text:style-name="T2">(7/3) </text:span> [ⲙⲓⲛ ⲙ̅ⲙⲟϥ ϩ̅ⲙ̅ ⲡⲉϥⲟⲩⲟⲉⲓ]ⲛ ⲉⲧⲕⲱ ⲧⲉ ⲉ‐ <text:line-break/><text:span text:style-name="T1"> </text:span><text:span text:style-name="T2">(7/4) </text:span> [ⲣⲟϥ ⲉⲧⲉ ⲛ̅ⲧⲟϥ ⲡⲉ ⲧⲡⲏ]ⲅ̣ⲏ ⲙ̅ⲙⲟⲩ· ⲛ̅‐ <text:line-break/><text:span text:style-name="T1"> </text:span><text:span text:style-name="T2">(7/5) </text:span> [ⲱⲛϩ ⲡⲟⲩⲟⲉⲓⲛ ⲉⲧⲙⲏϩ] ⲛ̣ϩⲓⲗⲉⲓⲕⲣⲓⲛⲉⲥ <text:line-break/><text:span text:style-name="T1"> </text:span><text:span text:style-name="T2">(7/6) </text:span> [ⲧⲏ]ⲏⲅⲏ [ⲛ̅ⲧⲉ ⲡⲉⲡ̅ⲛ̅]ⲁ̣̅ ⲉⲥϩ̅ⲣ̅ ⲙⲟⲟⲩ· <text:line-break/><text:span text:style-name="T1"> </text:span><text:span text:style-name="T2">(7/7) </text:span> [ⲉⲧⲟⲛ]ϩ̣ ⲉⲃⲟⲗ [ⲁⲩⲱ] ⲛ̣ⲉϥⲉⲡⲓⲭⲟⲣⲏ‐ <text:line-break/><text:span text:style-name="T1"> </text:span><text:span text:style-name="T2">(7/8) </text:span> [ⲅⲉⲓ ⲛ̅]ⲛ̣ⲁ̣ⲓ̣ⲱ̣[ⲛ ⲧⲏⲣ]ⲟⲩ ⲙ̅ⲛ̅ ⲛⲉⲩⲕⲟⲥ‐ <text:line-break/><text:span text:style-name="T1"> </text:span><text:span text:style-name="T2">(7/9) </text:span> [ⲙⲟⲥ] ⲁ̣ⲩⲱ ϩ̅ⲛ̣̅̅ [ⲥⲙⲟ]ⲧ ⲛⲓⲙ ⲧⲉϥϩⲓⲕⲱⲛ <text:line-break/><text:span text:style-name="T1"> </text:span><text:span text:style-name="T2">(7/10) </text:span> [ⲙ̅ⲙⲓ]ⲛ̣ ⲙ̅ⲙⲟϥ ⲉ̣ϥ̣ⲛⲁⲩ ⲉⲣⲟⲥ ϩ̅ⲙ̅ ⲡⲙⲟ‐ <text:line-break/><text:span text:style-name="T1"> </text:span><text:span text:style-name="T2">(7/11) </text:span> [ⲟⲩ ⲛ̅ⲟ]ⲩ̣ⲟⲉⲓⲛ ⲛ̅ⲕⲁⲑⲁⲣⲟⲛ ⲉⲧⲕⲱⲧⲉ ⲉ‐ <text:line-break/><text:span text:style-name="T1"> </text:span><text:span text:style-name="T2">(7/12) </text:span> [ⲣⲟϥ] ⲁ̣ⲩⲱ ⲧⲉϥⲉⲛⲛⲟⲓⲁ ⲁⲥⲣ̅ ⲟⲩϩⲱⲃ· <text:line-break/><text:span text:style-name="T1"> </text:span><text:span text:style-name="T2">(7/13) </text:span> [ⲁⲥⲟⲩ]ⲱⲛϩ ⲉⲃⲟⲗ· ⲁⲥⲁϩⲉ ⲉⲣⲁⲧ̅ⲥ̅ ⲙ̅ⲡⲉϥ <text:line-break/><text:span text:style-name="T1"> </text:span><text:span text:style-name="T2">(7/14) </text:span> [ⲙ̅ⲧⲟ] ⲉ̣ⲃⲟⲗ· ϩ̅ⲙ̅ ⲡⲉϥⲗⲁⲙⲡⲏⲇⲟⲛⲟⲥ ⲛ̅‐ <text:line-break/><text:span text:style-name="T1"> </text:span><text:span text:style-name="T2">(7/15) </text:span> [ⲟⲩⲟⲉⲓ]ⲛ ⲉⲧⲉ ⲛ̅ⲧⲟⲥ ⲡⲉ ⲧ· ⲇⲩⲛⲁⲙⲓⲥ ⲉ‐ <text:line-break/><text:span text:style-name="T1"> </text:span><text:span text:style-name="T2">(7/16) </text:span> [ⲧϣⲟ]ⲟ̣ⲡ· ϩⲁⲑⲏ ⲛ̅ⲛ̅ⲕⲁ ⲛⲓⲙ· ⲧⲉⲡⲣⲟⲛⲟⲓⲁ <text:line-break/><text:span text:style-name="T1"> </text:span><text:span text:style-name="T2">(7/17) </text:span> [ⲙ̅ⲡⲧ]ⲏ̣ⲣ̅ϥ̅ ⲉⲧⲣ̅ⲟⲩⲟⲉⲓⲛ ϩ̅ⲙ̅ ⲡⲟⲩⲟⲉⲓⲛ ⲛ̅‐ <text:line-break/><text:span text:style-name="T1"> </text:span><text:span text:style-name="T2">(7/18) </text:span> [ⲑⲓⲕⲱ]ⲛ ⲙ̅ⲡⲁϩⲟⲣⲁⲧⲟⲥ· ⲧⲧⲉⲗⲓⲁ ⲛ̅ⲇⲩ‐ <text:line-break/><text:span text:style-name="T1"> </text:span><text:span text:style-name="T2">(7/19) </text:span> [ⲛⲁ]ⲙ̣ⲓⲥ ⲧ̅ⲃ̅ⲁ̅ⲣ̅ⲃ̅ⲏ̅ⲗ̅ⲟ̅ⲛ̅ ⲡⲁⲓⲱⲛ ⲉⲧϫⲏⲕ <text:line-break/><text:span text:style-name="T1"> </text:span><text:span text:style-name="T2">(7/20) </text:span> [ⲉⲃⲟⲗ] ⲛ̅ⲡⲉⲟⲟⲩ ⲉϥϯ ⲉⲟⲟⲩ ⲛⲁϥ· ϫⲉ ⲉⲃⲟⲗ ϩⲓ‐ <text:line-break/><text:span text:style-name="T1"> </text:span><text:span text:style-name="T2">(7/21) </text:span> [ⲧⲟⲟⲧ̅]ϥ̅ ⲁⲥⲟⲩⲱⲛϩ ⲉⲃⲟⲗ ⲁⲩⲱ ⲁⲥϯ ⲉⲟⲟⲩ <text:line-break/><text:span text:style-name="T1"> </text:span><text:span text:style-name="T2">(7/22) </text:span> [ⲛⲁϥ]· ⲧⲉⲉⲓ ⲧⲉ ⲧⲉϩⲟⲩⲉⲓⲧⲉ ⲛ̅ⲛⲉⲛⲛⲟⲓⲁ <text:line-break/><text:span text:style-name="T1"> </text:span><text:span text:style-name="T2">(7/23) </text:span> [ⲧⲉϥ]ϩ̣ⲓⲕⲱⲛ ⲁⲥϣⲱⲡⲉ ⲛ̅ⲟⲩϩⲟⲉⲓⲧ· ⲛ̅‐ <text:line-break/><text:span text:style-name="T1"> </text:span><text:span text:style-name="T2">(7/24) </text:span> [ⲣⲱⲙ]ⲉ ⲉⲧⲉ ⲛ̅ⲧⲟϥ ⲡⲉ ⲡⲡ̅ⲛ̅ⲁ̅ ⲛ̅ⲡⲁⲣⲑⲉⲛⲓ‐ <text:line-break/><text:span text:style-name="T1"> </text:span><text:span text:style-name="T2">(8/1) </text:span> ⲕⲟⲛ ⲡϣ[ⲟⲙⲧ ϩⲟⲟⲩⲧ ⲡⲁ ⲡϣⲟⲙⲛⲧ] <text:line-break/><text:span text:style-name="T1"> </text:span><text:span text:style-name="T2">(8/2) </text:span> ⲛ̅ϩⲩⲙⲛⲟⲥ [ⲡϣⲟⲙⲛⲧ ⲛ̅ⲣⲁⲛ ⲧϣⲟ]‐ <text:line-break/><text:span text:style-name="T1"> </text:span><text:span text:style-name="T2">(8/3) </text:span> ⲙⲛ̅ⲧ ⲛ̅ⲇⲩⲛ̣[ⲁⲙⲓⲥ ⲡⲁⲓⲱⲛ ⲉⲧⲉ ⲙⲉϥ ⲣ̅ϩⲗ]‐ <text:line-break/><text:span text:style-name="T1"> </text:span><text:span text:style-name="T2">(8/4) </text:span> ⲗⲟ ⲛ̅ⲟⲩϩⲟⲟ̣[ⲩⲧⲥϩⲓⲙⲉ ⲛ̅ⲧⲁϥⲡⲣⲟ]‐ <text:line-break/><text:span text:style-name="T1"> </text:span><text:span text:style-name="T2">(8/5) </text:span> ⲉⲗⲑⲉ ⲉⲃⲟⲗ [ϩ̅ⲛ̅ ⲧⲉϥⲡⲣⲟⲛⲟⲓⲁ ⲁⲩⲱ ⲁⲥⲁⲓ]‐ <text:line-break/><text:soft-page-break/><text:span text:style-name="T1"> </text:span><text:span text:style-name="T2">(8/6) </text:span> ⲧⲓ ⲙ̅ⲙⲟϥ ⲛ̅[ϭⲓ ⲧⲃⲁⲣⲃ]ⲏ̣ⲗⲟⲛ [ⲉϯ ⲛⲁⲥ] <text:line-break/><text:span text:style-name="T1"> </text:span><text:span text:style-name="T2">(8/7) </text:span> ⲛ̅ⲟⲩϣ̅ⲣ̅ⲡ̅ ⲛ̅[ⲥⲟⲟⲩⲛ] ⲁⲩⲱ ⲁϥ̣[ⲕⲁⲧⲁ]‐ <text:line-break/><text:span text:style-name="T1"> </text:span><text:span text:style-name="T2">(8/8) </text:span> ⲛⲉⲩⲉ· ⲛ̅ⲧⲉⲣⲉ̣ϥ̣ⲕ̣[ⲁⲧⲁⲛ]ⲉⲩⲉ ⲁ[ⲡϣⲟⲣⲡ] <text:line-break/><text:span text:style-name="T1"> </text:span><text:span text:style-name="T2">(8/9) </text:span> ⲛ̅ⲥⲟⲟⲩⲛ ⲟⲩⲱⲛ[ϩ ⲉⲃⲟⲗ] ⲛⲁϥ ⲉϥ̣[ⲁϩⲉ]‐ <text:line-break/><text:span text:style-name="T1"> </text:span><text:span text:style-name="T2">(8/10) </text:span> ⲣⲁⲧ̅ϥ̅ ⲙ̅ⲛ̅ ⲧⲉⲛⲛⲟⲓ̣[ⲁ] ⲉⲧⲉ ⲧⲉⲡⲣⲟ̣[ⲛⲟⲓⲁ ⲧⲉ] <text:line-break/><text:span text:style-name="T1"> </text:span><text:span text:style-name="T2">(8/11) </text:span> ⲛⲉⲥϯ ⲉⲟⲟⲩ ⲙ̅ⲡⲁϩⲟⲣⲁⲧⲟⲛ ⲙ̅[ⲡ̅ⲛ̅ⲁ̅ <text:line-break/><text:span text:style-name="T1"> </text:span><text:span text:style-name="T2">(8/12) </text:span> ⲙ̅ⲛ̅ ⲧⲇⲩⲛⲁⲙⲓⲥ ⲉⲧϫⲏⲕ ⲉⲃⲟⲗ ⲧ[ⲃ̅ⲁⲣ̅ⲃ̅ⲏⲗⲟⲛ̅ <text:line-break/><text:span text:style-name="T1"> </text:span><text:span text:style-name="T2">(8/13) </text:span> ϫⲉ ⲛ̅ⲧⲁϥϣⲱⲡⲉ ⲉⲃⲟⲗ ϩⲓⲧⲟⲟⲧ̅[ⲥ̅ ⲡⲁ]‐ <text:line-break/><text:span text:style-name="T1"> </text:span><text:span text:style-name="T2">(8/14) </text:span> ⲗⲓⲛ ⲁⲥⲁⲓⲧⲓ ⲉϯ ⲛⲁⲥ ⲛ̅ⲟⲩⲁⲫⲑⲁⲣ[ⲥⲓⲁ ⲁⲩ]‐ <text:line-break/><text:span text:style-name="T1"> </text:span><text:span text:style-name="T2">(8/15) </text:span> ⲱ ⲁϥⲕⲁⲧⲁⲛⲉⲩⲉ ⲛ̅ⲧⲉⲣⲉϥⲕⲁⲧⲁⲛ[ⲉⲩⲉ ⲁ]‐ <text:line-break/><text:span text:style-name="T1"> </text:span><text:span text:style-name="T2">(8/16) </text:span> ⲧⲁⲫⲑⲁⲣⲥⲓⲁ ⲟⲩⲱⲛϩ ⲉⲃⲟⲗ ⲛⲉⲥ[ⲁϩⲉ ⲉ]‐ <text:line-break/><text:span text:style-name="T1"> </text:span><text:span text:style-name="T2">(8/17) </text:span> ⲣⲁⲧ̅ⲥ ⲙ̅ⲛ̅ ⲧⲉⲛⲛⲟⲓⲁ ⲙ̅ⲛ̅ ⲡϣⲣⲡ· ⲛ̣̅[ⲥⲟ ⲟⲩⲛ] <text:line-break/><text:span text:style-name="T1"> </text:span><text:span text:style-name="T2">(8/18) </text:span> ⲉⲩϯ ⲉⲟⲟⲩ ⲙ̅ⲡⲁϩⲟⲣⲁⲧⲟⲛ ⲙ̅ⲡ̅ⲛ̅ⲁ̅ ⲙ̣̅[ⲛ̅ ⲧ]‐ <text:line-break/><text:span text:style-name="T1"> </text:span><text:span text:style-name="T2">(8/19) </text:span> ⲃⲁ̅ⲣ̅ⲃ̅ⲏ̅ⲗ̅ⲟ̅ⲛ ϫⲉ ⲛ̅ⲧⲁⲩϣⲱⲡⲉ ⲉⲃⲟ[ⲗ ϩⲓⲧⲟ]‐ <text:line-break/><text:span text:style-name="T1"> </text:span><text:span text:style-name="T2">(8/20) </text:span> ⲟⲧ̅ⲥ̅ ⲁⲩⲱ ⲁⲥⲁⲓⲧⲓ ⲉϯ ⲛⲁⲥ ⲛ̅ⲟⲩⲱ̣[ⲛϩ] <text:line-break/><text:span text:style-name="T1"> </text:span><text:span text:style-name="T2">(8/21) </text:span> ⲛ̅ϣⲁ ⲉⲛⲉϩ· ⲁⲩⲱ ⲁϥⲕⲁⲧⲁⲛⲉⲩⲉ ⲛ̣̅[ⲧⲉ]‐ <text:line-break/><text:span text:style-name="T1"> </text:span><text:span text:style-name="T2">(8/22) </text:span> ⲣⲉϥⲕⲁⲧⲁⲛⲉⲩⲉ ⲁ ⲡⲱⲛϩ ⲛ̅ϣⲁ ⲉⲛ̣[ⲉϩ]‐ <text:line-break/><text:span text:style-name="T1"> </text:span><text:span text:style-name="T2">(8/23) </text:span> ⲟⲩⲱⲛϩ ⲉⲃⲟⲗ· ⲁⲩⲱ ⲛⲁϥⲉϩⲉ ⲉⲣⲁⲧ[ϥ ⲉϥ]‐ <text:line-break/><text:span text:style-name="T1"> </text:span><text:span text:style-name="T2">(8/24) </text:span> ϯ ⲉⲟⲟⲩ ⲛⲁϥ ⲙ̅ⲛ̅ ⲧⲃⲁⲣⲃⲏⲗⲟⲛ ϫ̣[ⲉ] <text:line-break/><text:span text:style-name="T1"> </text:span><text:span text:style-name="T2">(9/1) </text:span> ⲉⲧⲃⲏⲏⲧ̅ⲥ̅ ⲛ̅[ⲧⲁⲩ]ϣ̣ⲱⲡⲉ ⲉϩⲣⲁⲓ̈ ⲉ‐ <text:line-break/><text:span text:style-name="T1"> </text:span><text:span text:style-name="T2">(9/2) </text:span> ϫ̅ⲙ̅ ⲡⲟⲩⲱⲛ[ϩ ⲉⲃⲟ]ⲗ̣ ⲙ̅ⲡⲁϩⲟⲣⲁⲧⲟⲛ <text:line-break/><text:span text:style-name="T1"> </text:span><text:span text:style-name="T2">(9/3) </text:span> ⲙ̅ⲡ̅ⲛ̅ⲁ̅ ⲛⲁⲓ̈ ⲛ̣[ⲉ ⲡ]ϯⲟⲩ ⲛ̅ⲁⲓⲱⲛ ⲛ̅‐ <text:line-break/><text:span text:style-name="T1"> </text:span><text:span text:style-name="T2">(9/4) </text:span> ⲧⲉ ⲡⲉⲓⲱⲧ· ⲉⲧ[ⲉ ⲛ̅ⲧ]ⲟ̣ϥ ⲡⲉ ⲡⲉϩⲟⲩⲉⲓⲧ <text:line-break/><text:span text:style-name="T1"> </text:span><text:span text:style-name="T2">(9/5) </text:span> ⲛ̅ⲣⲱⲙⲉ ⲧϩ̣ⲓ̣ⲕ̣[ⲱⲛ ⲙ̅]ⲡ[ⲁ]ϩ̣ⲟⲣⲁⲧⲟⲥ ⲧⲁ‐ <text:line-break/><text:span text:style-name="T1"> </text:span><text:span text:style-name="T2">(9/6) </text:span> ⲉⲓ ⲧⲉ ⲧⲃⲁⲣⲃⲏ̣[ⲗⲟⲛ] ⲙ̣̅̅ⲛ̅ ⲧⲉⲛⲛⲟⲓⲁ ⲙ̅ⲛ̅ <text:line-break/><text:span text:style-name="T1"> </text:span><text:span text:style-name="T2">(9/7) </text:span> ⲡϣ̅ⲣ̅ⲡ ⲛ̅ⲥⲟ[ⲟⲩⲛ ⲙ̅]ⲛ̣̅ ⲧⲁⲫⲑⲁⲣⲥⲓⲁ ⲙ̅ⲛ̅ <text:line-break/><text:span text:style-name="T1"> </text:span><text:span text:style-name="T2">(9/8) </text:span> ⲡⲱⲛϩ ⲛ̅ϣ[ⲁ ⲉⲛⲉ]ϩ̣ ⲡⲁⲓ̈ ⲡⲉ ⲡϯⲟⲩ ⲛ̅ϩⲟ‐ <text:line-break/><text:span text:style-name="T1"> </text:span><text:span text:style-name="T2">(9/9) </text:span> ⲟⲩⲧ· ⲥϩⲓⲙⲉ ⲉⲧ̣[ⲉ] ⲡ̣ⲙⲏⲧ· ⲛ̅ⲁⲓⲱⲛ ⲛ̅ⲧⲉ <text:line-break/><text:span text:style-name="T1"> </text:span><text:span text:style-name="T2">(9/10) </text:span> ⲡⲉⲓⲱⲧ· ⲁⲩⲱ ⲁⲥ̣ϭⲱϣⲧ· ⲉⲙⲁϣⲟ ⲛ̅ϭⲓ <text:line-break/><text:span text:style-name="T1"> </text:span><text:span text:style-name="T2">(9/11) </text:span> ⲧⲃ̅ⲁ̅ⲣ̅ⲃ̅ⲏ̅ⲗ̅ⲟ̅ⲛ ⲉϩⲟⲩⲛ ⲉⲡϩⲓⲗⲓⲕⲣⲓⲛⲉⲥ <text:line-break/><text:span text:style-name="T1"> </text:span><text:span text:style-name="T2">(9/12) </text:span> ⲛ̅ⲟⲩⲟⲉⲓⲛ· ⲁⲩⲱ ⲁⲥⲧⲕⲁⲧⲟ ⲉϩⲟⲩⲛ ⲉⲣⲟϥ <text:line-break/><text:span text:style-name="T1"> </text:span><text:span text:style-name="T2">(9/13) </text:span> ⲁⲥϫⲡⲟ ⲛ̅ⲟⲩⲥⲡⲓⲛⲑⲏⲣ ⲛ̅ⲟⲩⲟⲉⲓⲛ ⲉϥ‐ <text:line-break/><text:span text:style-name="T1"> </text:span><text:span text:style-name="T2">(9/14) </text:span> ⲉⲓⲛⲉ ⲙ̅ⲡⲟⲩⲟⲉⲓⲛ ⲉⲧⲉ ⲛⲁⲉⲓⲁⲧ̅ϥ̅· ⲁⲗ‐ <text:line-break/><text:span text:style-name="T1"> </text:span><text:span text:style-name="T2">(9/15) </text:span> ⲗⲁ ⲛ̅ϥ̅ϣⲏϣ ⲁⲛ ϩ̅ⲛ̅ ⲧⲙ̅ⲛⲧ̅ⲛⲟϭ ⲡⲉⲉⲓ <text:line-break/><text:span text:style-name="T1"> </text:span><text:span text:style-name="T2">(9/16) </text:span> ⲡⲉ ⲡⲙⲟⲛⲟⲅⲉⲛⲏⲥ ⲉⲣ̅ⲟⲩⲱⲛϩ ⲉⲃⲟⲗ <text:line-break/><text:span text:style-name="T1"> </text:span><text:span text:style-name="T2">(9/17) </text:span> ϩ̅ⲙ̅ ⲡⲓⲱⲧ· ⲡⲁⲩⲧⲟⲅⲉⲛⲏⲥ ⲛ̅ⲛⲟⲩⲧⲉ <text:line-break/><text:span text:style-name="T1"> </text:span><text:span text:style-name="T2">(9/18) </text:span> ⲡϣⲏⲣⲉ ⲛ̅ϣⲁⲙⲓⲥⲉ ⲛ̅ⲧⲛ̅ⲛⲁ ⲡⲓⲱⲧ· <text:line-break/><text:span text:style-name="T1"> </text:span><text:span text:style-name="T2">(9/19) </text:span> ⲧⲏⲣⲟⲩ ⲡⲓⲗⲓⲕⲣⲓⲛⲉⲥ ⲛ̅ⲟⲩⲟⲉⲓⲛ ⲁϥ‐ <text:line-break/><text:span text:style-name="T1"> </text:span><text:span text:style-name="T2">(9/20) </text:span> ⲧⲉⲗⲏⲗ ⲛ̅ϭⲓ ⲡⲛⲟϭ ⲛ̅ⲁϩⲟⲣⲁⲧⲟⲛ ⲛ̅ⲡ̅ⲛ̅ⲁ̅ <text:line-break/><text:span text:style-name="T1"> </text:span><text:span text:style-name="T2">(9/21) </text:span> ⲉϩⲣⲁⲓ̈ ⲉϫ̅ⲙ ⲡⲟⲩⲟⲉⲓⲛ ⲡⲁⲓ̈ ⲛ̅ⲧⲁϥⲟⲩ‐ <text:line-break/><text:span text:style-name="T1"> </text:span><text:span text:style-name="T2">(9/22) </text:span> ⲱⲛϩ ⲉⲃⲟⲗ ϩ̅ⲛ̅ ϯϩⲟⲩⲉⲓⲧⲉ ⲛ̅ϭⲟⲙ ⲉ‐ <text:line-break/><text:span text:style-name="T1"> </text:span><text:span text:style-name="T2">(9/23) </text:span> ⲧⲉ ⲧⲁⲓ̈ ⲧⲉ ⲧⲉϥⲡⲣⲟⲛⲟⲓⲁ ⲧⲃⲁⲣⲃⲏⲗⲟⲛ <text:line-break/><text:span text:style-name="T1"> </text:span><text:span text:style-name="T2">(9/24) </text:span> ⲁϥⲧⲱϩ̅ⲥ̅ ⲙ̅ⲙⲟϥ ϩ̅ⲛ̅ ⲧⲉϥⲙ̅ⲛⲧ̅ⲭ̅ⲣⲥ̅ <text:line-break/><text:span text:style-name="T1"> </text:span><text:span text:style-name="T2">(10/1) </text:span> ⲙ̅ⲓⲛ ⲙⲟϥ ϩⲱⲥⲧⲉ̣[ⲛ̅ϥ̅]ϣ̣ⲱⲡⲉ ⲛ̅ⲧⲉⲗⲉⲓⲟⲥ <text:line-break/><text:span text:style-name="T1"> </text:span><text:span text:style-name="T2">(10/2) </text:span> ⲉⲙ̅ⲛ̅ⲧ̅ϥ̅ ϭⲣⲱϩ ⲉϥ̣[ϣⲟⲟ]ⲡ· ⲛ̅ⲭ̅ⲣⲥ̅ ϫⲉ ⲁⲩ <text:line-break/><text:span text:style-name="T1"> </text:span><text:span text:style-name="T2">(10/3) </text:span> ⲧⲱϩ̅ⲥ̅ ⲙ̅ⲙⲟϥ ⲛ̅[ⲧⲙ̅]ⲛ̣̅ⲧ̅ⲭⲣⲏⲥⲧⲟⲥ ⲙ̅ⲡⲁ‐ <text:line-break/><text:span text:style-name="T1"> </text:span><text:span text:style-name="T2">(10/4) </text:span> ϩⲟⲣⲁⲧⲟⲛ ⲙ̅ⲡ̅ⲛ̅[ⲁ̅ ⲁϥ]ⲟⲩⲱⲛϩ ⲛⲁϥ ⲉⲃⲟⲗ· <text:line-break/><text:soft-page-break/><text:span text:style-name="T1"> </text:span><text:span text:style-name="T2">(10/5) </text:span> ⲁⲩⲱ ⲁϥϫⲓ ⲙ̣̅ⲡ̣ⲧ̣[ⲱⲥ̅ϩ̅ⲉ]ⲃ̣ⲟ̣ⲗ̣ ϩⲓⲧⲟⲟⲧϥ ⲙ̅‐ <text:line-break/><text:span text:style-name="T1"> </text:span><text:span text:style-name="T2">(10/6) </text:span> ⲡ̣·ⲡⲁⲣⲑⲉⲛⲓⲕ̣[ⲟⲛ ⲙ̅ⲡ̅]ⲛ̅ⲁ̅ [ⲡⲧⲱϩⲥ] ⲁⲩⲱ <text:line-break/><text:span text:style-name="T1"> </text:span><text:span text:style-name="T2">(10/7) </text:span> ⲁϥⲁϩⲉ ⲉⲣⲁⲧϥ ⲙ̅ⲡ̣[ⲉϥⲙ̅]ⲧⲟ ⲉⲃⲟⲗ ⲉϥϯ ⲉ‐ <text:line-break/><text:span text:style-name="T1"> </text:span><text:span text:style-name="T2">(10/8) </text:span> ⲟⲟⲩ ⲙ̅ⲡⲁϩⲟⲣⲁⲧⲟ̣[ⲛ ⲙ̅ⲡ̅]ⲛ̣̅̅ⲁ̅ ⲙ̅ⲛ̅ ⲡⲉⲛ‐ <text:line-break/><text:span text:style-name="T1"> </text:span><text:span text:style-name="T2">(10/9) </text:span> ⲧⲉϥⲟⲩⲱⲛϩ ⲉⲃⲟⲗ [ϩⲓⲧⲟⲟ]ⲧ̅ϥ̅ ⲁⲩⲱ ⲁϥⲣ̅‐ <text:line-break/><text:span text:style-name="T1"> </text:span><text:span text:style-name="T2">(10/10) </text:span> ⲁⲓⲧⲓ ⲉϯ ⲛⲁϥ ⲛ̅ⲟⲩϣ̣ⲃ̣ⲣ̣ⲣⲉϥⲣ̅ϩⲱⲃ· ⲡⲛⲟⲩⲥ <text:line-break/><text:span text:style-name="T1"> </text:span><text:span text:style-name="T2">(10/11) </text:span> ⲁⲩⲱ ⲁϥⲕⲁⲧⲁⲛⲉⲩⲉ ⲛ̅ϭⲓ ⲡⲁϩⲟⲣⲁⲧⲟⲛ ⲛ̅‐ <text:line-break/><text:span text:style-name="T1"> </text:span><text:span text:style-name="T2">(10/12) </text:span> ⲡ̅ⲛ̅ⲁ̅ ⲁ ⲡⲛⲟⲩⲥ ⲟⲩⲱⲛϩ ⲉⲃⲟⲗ ⲛⲉϥⲁϩⲉ <text:line-break/><text:span text:style-name="T1"> </text:span><text:span text:style-name="T2">(10/13) </text:span> ⲉⲣⲁⲧ̅ϥ̅ ⲙ̅ⲛ̅ ⲡⲉⲭ̅ⲣⲥ̅ ⲉⲩϯ ⲉⲟⲟⲩ ⲛⲉϥ ⲙ̅ⲛ̅ <text:line-break/><text:span text:style-name="T1"> </text:span><text:span text:style-name="T2">(10/14) </text:span> ⲧⲃⲁⲣⲃⲏⲗⲟⲛ· ⲛⲁⲓ̈ ⲧⲏⲣⲟⲩ ⲛ̅ⲧⲁⲩ ϣⲱⲡⲉ <text:line-break/><text:span text:style-name="T1"> </text:span><text:span text:style-name="T2">(10/15) </text:span> ϩ̅ⲛ̅ ⲟⲩⲥⲓⲅⲏ ⲙ̅ⲛ̅ ⲟⲩⲉⲛⲛⲟⲓⲁ ⲁϥⲣ̅ϩⲛⲁϥ <text:line-break/><text:span text:style-name="T1"> </text:span><text:span text:style-name="T2">(10/16) </text:span> ⲛ̅ϭⲓ ⲡⲁϩⲟⲣⲁⲧⲟⲛ ⲙ̅ⲡ̅ⲛ̅ⲁ̅ ⲉⲉⲓⲣⲉ ⲛ̅ⲟⲩϩⲱⲃ <text:line-break/><text:span text:style-name="T1"> </text:span><text:span text:style-name="T2">(10/17) </text:span> ϩⲓⲧ̅ⲛ̅ ⲟⲩϣⲁϫⲉ ⲁⲩⲱ ⲡⲉϥⲑⲉⲗⲏⲙⲁ ⲁϥ‐ <text:line-break/><text:span text:style-name="T1"> </text:span><text:span text:style-name="T2">(10/18) </text:span> ϣⲱⲡⲉ ⲛ̅ⲟⲩϩⲱⲃ ⲁϥⲟⲩⲱⲛϩ ⲉⲃⲟⲗ· ⲁϥ‐ <text:line-break/><text:span text:style-name="T1"> </text:span><text:span text:style-name="T2">(10/19) </text:span> ⲁϩⲉ ⲉⲣⲁⲧ̅ϥ̅ ⲙ̅ⲛ̅ ⲡⲛⲟⲩⲥ ⲙ̅ⲛ̅ ⲡⲟⲩⲟⲉⲓⲛ ⲉϥ‐ <text:line-break/><text:span text:style-name="T1"> </text:span><text:span text:style-name="T2">(10/20) </text:span> ϯ ⲉⲟⲟⲩ ⲛⲁϥ ⲁⲩⲱ ⲡϣⲁϫⲉ ⲁϥⲟⲩⲁϩϥ· <text:line-break/><text:span text:style-name="T1"> </text:span><text:span text:style-name="T2">(10/21) </text:span> ⲛ̅ⲥⲁ ⲡⲟⲩⲱϣⲉ· ⲉⲃⲟⲗ ⲅⲁⲣ ϩⲓⲧ̅ⲙ̅ ⲡϣⲁ‐ <text:line-break/><text:span text:style-name="T1"> </text:span><text:span text:style-name="T2">(10/22) </text:span> ϫⲉ ⲁ ⲡⲉⲭ̅ⲣ̅ⲥ̅ ⲧⲁⲙⲓⲟ ⲛ̅ⲛ̅ⲕⲁ ⲛⲓⲙ ⲡⲁⲩⲧⲟ‐ <text:line-break/><text:span text:style-name="T1"> </text:span><text:span text:style-name="T2">(10/23) </text:span> ⲅⲉⲛⲏⲥ ⲛ̅ⲛⲟⲩⲧⲉ ⲡⲱⲛϩ ⲛ̅ϣⲁ ⲁⲛⲏϩⲉ <text:line-break/><text:span text:style-name="T1"> </text:span><text:span text:style-name="T2">(10/24) </text:span> ⲙ̅ⲛ̅ ⲡⲉⲑⲉⲗⲏⲙⲁ ⲡⲛⲟⲩⲥ ⲙ̅ⲛ̅ ⲧⲉⲡⲣⲟ‐ <text:line-break/><text:span text:style-name="T1"> </text:span><text:span text:style-name="T2">(10/25) </text:span> ⲅⲛⲱⲥⲓⲥ ⲛⲉⲩⲁϩⲉ ⲉⲣⲁⲧⲟⲩ ⲉⲩϯ ⲉⲟⲟⲩ ⲙ̅‐ <text:line-break/><text:span text:style-name="T1"> </text:span><text:span text:style-name="T2">(11/1) </text:span> ⲡⲁϩⲟⲣⲁⲧⲟⲛ̣ [ⲙ]ⲡ̣̅̅ⲛ̅ⲁ̅· ⲙ̅ⲛ̅ ⲧⲃⲁⲣⲃⲏ‐ <text:line-break/><text:span text:style-name="T1"> </text:span><text:span text:style-name="T2">(11/2) </text:span> ⲗⲟⲛ ϫⲉ ⲛ̅ⲧⲁ[ⲩϣ]ⲱ̣ⲡⲉ ⲉⲃⲟⲗ ϩⲓⲧⲟⲟⲧ̅ⲥ̅ <text:line-break/><text:span text:style-name="T1"> </text:span><text:span text:style-name="T2">(11/3) </text:span> ⲁϥϫⲱⲕ ⲉⲃⲟⲗ [ⲛ̅ϭⲓ] ⲡⲛⲟϭ ⲛⲁϩⲟⲣⲁⲧⲟⲛ <text:line-break/><text:span text:style-name="T1"> </text:span><text:span text:style-name="T2">(11/4) </text:span> ⲙ̅ⲡ̅ⲛ̅ⲁ̅ ⲡⲁⲩⲧⲟ[ⲅⲉⲛ]ⲏ̣ⲥ ⲛ̅ⲛⲟⲩⲧⲉ ⲡϣⲏ‐ <text:line-break/><text:span text:style-name="T1"> </text:span><text:span text:style-name="T2">(11/5) </text:span> ⲣⲉ ⲛ̅ⲧⲃⲁⲣⲃⲏⲗ̣[ⲟⲛ ⲉⲩⲡⲁ]ⲣ̣ⲁⲥⲧⲁⲥⲓⲥ ⲙ̅‐ <text:line-break/><text:span text:style-name="T1"> </text:span><text:span text:style-name="T2">(11/6) </text:span> ⲡⲛⲟϭ ⲛ̅ⲁϩⲟⲣ̣[ⲁⲧⲟⲛ] ⲙ̅ⲡ̅ⲛ̅ⲁ̅ ⲡⲁⲩⲧⲟⲅⲉ‐ <text:line-break/><text:span text:style-name="T1"> </text:span><text:span text:style-name="T2">(11/7) </text:span> ⲛⲏⲥ ⲛ̅ⲛⲟⲩⲧⲉ [ⲡⲉⲭ̅]ⲣ̅ⲥ̅ ⲡⲉⲛⲧⲁϥⲧⲓ‐ <text:line-break/><text:span text:style-name="T1"> </text:span><text:span text:style-name="T2">(11/8) </text:span> ⲙⲁ ⲙ̅ⲙⲟϥ [ϩ̅ⲛ̅ ⲟⲩ]ⲛⲟϭ ⲛⲧⲓⲙⲏ ⲉⲡⲓ‐ <text:line-break/><text:span text:style-name="T1"> </text:span><text:span text:style-name="T2">(11/9) </text:span> ⲛ̅ⲧⲁϥϣⲱⲡ̣[ⲉ ⲉⲃ]ⲟⲗ ϩ̅ⲛ̅ ⲟⲩϩⲟⲩⲉⲓⲧⲉ ⲛ̅‐ <text:line-break/><text:span text:style-name="T1"> </text:span><text:span text:style-name="T2">(11/10) </text:span> ⲉⲛⲛⲟⲓⲁ ⲡⲁⲓ̈ ⲛ̅ⲧⲁϥⲕⲁⲁϥ ⲛ̅ϭⲓ ⲡⲁϩⲟ‐ <text:line-break/><text:span text:style-name="T1"> </text:span><text:span text:style-name="T2">(11/11) </text:span> ⲣⲁⲧⲟⲛ ⲛ̅ⲡ̅ⲁ̅ⲛ̅ ⲛ̅ⲛⲟⲩⲧⲉ ⲉϫ̅ⲛ̅ ⲛ̅ⲕⲁ ⲛⲓⲙ <text:line-break/><text:span text:style-name="T1"> </text:span><text:span text:style-name="T2">(11/12) </text:span> ⲁϥⲧⲣⲉ ⲧⲙⲉ ⲉⲧ̅ⲛ̅ϩⲏⲧ̅ϥ̅ ϩⲩⲡⲟⲧⲁⲥⲥⲉ <text:line-break/><text:span text:style-name="T1"> </text:span><text:span text:style-name="T2">(11/13) </text:span> ⲛⲁϥ ⲉⲧⲣⲉϥⲛⲟⲉⲓ ⲛ̅ⲛ̅ⲕⲁ ⲛⲓⲙ ⲡⲁⲓ̈ ⲉⲧⲟⲩ <text:line-break/><text:span text:style-name="T1"> </text:span><text:span text:style-name="T2">(11/14) </text:span> ⲛⲁϫⲱ ⲙ̅ⲡⲉϥⲣⲁⲛ ⲉⲛⲉⲧ̅ⲙ̅ⲡϣⲁ ⲉ‐ <text:line-break/><text:span text:style-name="T1"> </text:span><text:span text:style-name="T2">(11/15) </text:span> ⲃⲟⲗ ϩ̅ⲙ̅ ⲡⲟⲩⲟⲉⲓⲛ ⲉⲧⲉ ⲡⲉⲭ̅ⲣⲥ̅ ⲡⲉ ⲙ̅ⲛ̅ <text:line-break/><text:span text:style-name="T1"> </text:span><text:span text:style-name="T2">(11/16) </text:span> ⲧⲁⲡⲑⲁⲣⲥⲓⲁ ϩⲓⲧ̅ⲙ̅ ⲡϯ ⲙ̅ⲡⲁϩⲟⲣⲁⲧⲟⲛ <text:line-break/><text:span text:style-name="T1"> </text:span><text:span text:style-name="T2">(11/17) </text:span> ⲙ̅ⲡ̅ⲛ̅ⲁ̅ ⲡⲉϥϥⲧⲟⲟⲩ ⲛ̅ⲛⲟϭ ⲛ̅ⲟⲩⲟⲉⲓⲛ <text:line-break/><text:span text:style-name="T1"> </text:span><text:span text:style-name="T2">(11/18) </text:span> ⲉⲃⲟⲗ ϩⲓⲧ̅ⲛ̅ ⲡⲁⲩⲧⲟⲅⲉⲛⲏⲥ ⲛ̅ⲛⲟⲩⲧⲉ <text:line-break/><text:span text:style-name="T1"> </text:span><text:span text:style-name="T2">(11/19) </text:span> ⲁⲩⲟⲩⲱⲛϩ ⲉⲃⲟⲗ ⲉⲩⲡⲁⲣⲁⲥⲧⲁⲥⲓⲥ ⲛⲁϥ <text:line-break/><text:span text:style-name="T1"> </text:span><text:span text:style-name="T2">(11/20) </text:span> ⲡϣⲟⲙ̅ⲛ̅ⲧ· ⲡⲉⲑⲉⲗⲏⲙⲁ ⲙ̅ⲛ̅ ⲡⲱⲛϩ ⲛ̅‐ <text:line-break/><text:span text:style-name="T1"> </text:span><text:span text:style-name="T2">(11/21) </text:span> ϣⲁ ⲁⲛⲏϩⲉ· ⲙ̅ⲛ̅ ⲧⲉⲛⲛⲟⲓⲁ· ⲡⲉϥϥⲧⲟⲟⲩ <text:line-break/><text:span text:style-name="T1"> </text:span><text:span text:style-name="T2">(11/22) </text:span> ⲇⲉ ⲧⲉⲭⲁⲣⲓⲥ ⲧⲥⲩⲛϩⲉⲥⲓⲥ ⲧⲉⲥⲑⲏⲥⲓⲥ <text:line-break/><text:span text:style-name="T1"> </text:span><text:span text:style-name="T2">(11/23) </text:span> ⲙ̅ⲛ̅ ⲧⲉⲫⲣⲟⲛⲏⲥⲓⲥ· ⲧⲉⲭⲁⲣⲓⲥ ⲙ̅ⲛ̅ ⲡⲉ <text:line-break/><text:span text:style-name="T1"> </text:span><text:span text:style-name="T2">(11/24) </text:span> ϩⲟⲩⲉⲓⲧ ⲛ̅ⲟⲩⲟⲉⲓⲛ ⲁ̅ⲣ̅ⲙ̅ⲟ̅ⲍ̅ⲏ̅ⲗ̅ ⲉⲧⲉ ⲡⲁⲅ‐ <text:line-break/><text:span text:style-name="T1"> </text:span><text:span text:style-name="T2">(12/1) </text:span> ⲅⲉⲗⲟⲥ ⲡⲉ ⲙ̅ⲡⲉϩ̣[ⲟⲩⲉⲓ]ⲧ· ⲛ̅ⲁⲓⲱⲛ ⲁⲩⲱ <text:line-break/><text:span text:style-name="T1"> </text:span><text:span text:style-name="T2">(12/2) </text:span> ⲟⲩⲛ ϣⲟⲙ̅ⲛ̅ⲧ̅ ⲛ̣̅[ⲁⲓⲱ]ⲛ ⲛ̅ⲙⲙⲁϥ ⲧⲉ <text:line-break/><text:soft-page-break/><text:span text:style-name="T1"> </text:span><text:span text:style-name="T2">(12/3) </text:span> ⲭⲁⲣⲓⲥ ⲧⲁⲗⲏⲑⲉⲓ[ⲁ ⲧⲙ]ⲟⲣⲫⲏ· ⲡⲙⲉϩ‐ <text:line-break/><text:span text:style-name="T1"> </text:span><text:span text:style-name="T2">(12/4) </text:span> ⲥⲛⲁⲩ ⲛ̅ⲟⲩⲟⲉⲓⲛ [ⲱ̅ⲣ̅ⲟ̅]ⲓ̅ⲁⲏⲗ̅· ⲡⲉⲛⲧⲁϥ <text:line-break/><text:span text:style-name="T1"> </text:span><text:span text:style-name="T2">(12/5) </text:span> ⲕⲁⲧⲁⲑⲓⲥⲧⲁ ⲙ̅ⲙ̣[ⲟϥ] ϩ̣̅̅ⲙ̅ ⲡⲙⲉϩⲥⲛⲁⲩ ⲛ̅‐ <text:line-break/><text:span text:style-name="T1"> </text:span><text:span text:style-name="T2">(12/6) </text:span> ⲁⲓⲱⲛ ⲉⲩⲛ̣ ϣ[ⲟⲙⲛ̅ⲧ̅] ⲛ̣̅ⲁⲓⲱⲛ ⲛⲉⲙⲁϥ <text:line-break/><text:span text:style-name="T1"> </text:span><text:span text:style-name="T2">(12/7) </text:span> ⲉⲧⲉ ⲛⲁⲓ̈ ⲛⲉ ⲧⲉ[ⲡⲣⲟⲛⲟⲓ]ⲁ̣ ⲧⲉⲥⲑⲏⲥⲓⲥ ⲧⲉ <text:line-break/><text:span text:style-name="T1"> </text:span><text:span text:style-name="T2">(12/8) </text:span> ⲙⲛⲏⲙⲏ· ϩ̅ⲙ̅ ⲡ̣[ⲙⲉϩ]ϣⲟⲙ̅ⲛⲧ̅ ⲛ̅ⲟⲩⲟ‐ <text:line-break/><text:span text:style-name="T1"> </text:span><text:span text:style-name="T2">(12/9) </text:span> ⲉⲓⲛ ⲁⲩⲁⲡⲟⲕⲁⲑⲓ̣[ⲥⲧⲁ ⲙ̅]ⲙ̣ⲟϥ ϩ̅ⲙ̅ ⲡⲙⲉϩ‐ <text:line-break/><text:span text:style-name="T1"> </text:span><text:span text:style-name="T2">(12/10) </text:span> ϣⲟⲙ̅ⲛ̅ⲧ̅ ⲛ̅ⲁⲓⲱⲛ̣ [ⲛ̅ⲙ̅]ⲙ̣ⲁϥ ⲉⲧⲉ ⲛⲁⲓ̈ ⲛⲉ <text:line-break/><text:span text:style-name="T1"> </text:span><text:span text:style-name="T2">(12/11) </text:span> ⲧⲥⲩⲛϩⲉⲥⲓⲥ ⲧⲁⲅⲁⲡ̣ⲏ ⲧϩⲓⲇⲉⲁ· ϩ̅ⲙ̅ <text:line-break/><text:span text:style-name="T1"> </text:span><text:span text:style-name="T2">(12/12) </text:span> ⲡⲙⲉϩϥⲧⲟⲟⲩ ⲛ̅ⲟⲩⲟⲉⲓⲛ ⲁⲩⲁⲡⲟⲕⲁⲑⲓ‐ <text:line-break/><text:span text:style-name="T1"> </text:span><text:span text:style-name="T2">(12/13) </text:span> ⲥⲧⲁ ⲙ̅ⲙⲟϥ ϩ̅ⲙ̅ ⲡⲙⲉϩϥⲧⲟⲟⲩ ⲛ̅ⲁⲓⲱⲛ <text:line-break/><text:span text:style-name="T1"> </text:span><text:span text:style-name="T2">(12/14) </text:span> ⲉⲩⲛ̅ ϣⲟⲙ̅ⲛ̅ⲧ̅ ⲛ̅ⲁⲓⲱⲛ ⲛ̅ⲙ̅ⲙⲁϥ ⲉⲧⲉ <text:line-break/><text:span text:style-name="T1"> </text:span><text:span text:style-name="T2">(12/15) </text:span> ⲛⲁⲓ̈ ⲛⲉ ⲧⲙ̅ⲛ̅ⲧ̅ⲧⲉⲗⲓⲟⲥ ϯⲣⲏⲛⲏ ⲧⲥⲟ‐ <text:line-break/><text:span text:style-name="T1"> </text:span><text:span text:style-name="T2">(12/16) </text:span> ⲫⲓⲁ· ⲛⲁⲓ̈ ⲛⲉ ⲡⲉϥⲧⲟⲟⲩ ⲛ̅ⲟⲩⲉⲓⲛ ⲉⲧⲁ‐ <text:line-break/><text:span text:style-name="T1"> </text:span><text:span text:style-name="T2">(12/17) </text:span> ϩⲉ ⲉⲣⲁⲧⲟⲩ ⲉⲡⲁⲩⲧⲟⲅⲉⲛⲏⲥ ⲛ̅ⲛⲟⲩ <text:line-break/><text:span text:style-name="T1"> </text:span><text:span text:style-name="T2">(12/18) </text:span> ⲧⲉ· ⲡⲙ̅ⲛ̅ⲧⲥⲛⲟⲟⲩⲥ ⲛ̅ⲁⲓⲱⲛ ⲉⲧⲁϩⲉ <text:line-break/><text:span text:style-name="T1"> </text:span><text:span text:style-name="T2">(12/19) </text:span> ⲉⲣⲁⲧⲟⲩ ⲉⲡⲁⲗⲟⲩ [ϩⲓⲧ̅ⲙ̅ ⲡϯ ⲙ̅ⲛ̅ ⲧⲉⲩ‐ <text:line-break/><text:span text:style-name="T1"> </text:span><text:span text:style-name="T2">(12/20) </text:span> ⲇⲟⲕⲓⲁ] ⲙ̅ⲛ̅ ⲡⲛⲟϭ ⲛ̅ⲁⲩⲧⲟⲅⲉⲛⲉⲧⲱⲣ <text:line-break/><text:span text:style-name="T1"> </text:span><text:span text:style-name="T2">(12/21) </text:span> ⲛ̅ⲭ̅ⲣ̅ⲥ̅ ϩⲓⲧⲙ̅ ⲡϯ ⲙⲛ̅ ⲧⲉⲩⲇⲟⲕⲓⲁ ⲙ̅‐ <text:line-break/><text:span text:style-name="T1"> </text:span><text:span text:style-name="T2">(12/22) </text:span> ⲡⲁϩⲟⲣⲁⲧⲟⲛ ⲙ̅ⲡ̅ⲛ̅ⲁ̅ ⲛⲁⲓ̈ ⲛⲉ ⲡⲙⲛⲧ‐ <text:line-break/><text:span text:style-name="T1"> </text:span><text:span text:style-name="T2">(12/23) </text:span> ⲥⲛⲟⲟⲩⲥ ⲛ̅ⲁⲓⲱⲛ ⲛⲁ ⲡϣⲏⲣⲉ ⲛⲉ ⲙ̅‐ <text:line-break/><text:span text:style-name="T1"> </text:span><text:span text:style-name="T2">(12/24) </text:span> ⲡⲁⲩⲧⲟⲅⲉⲛⲏⲥ ⲉⲃⲟⲗ ϩ̅ⲙ̅ ⲡϣⲣⲡ ⲛ̅ⲥⲟ‐ <text:line-break/><text:span text:style-name="T1"> </text:span><text:span text:style-name="T2">(12/25) </text:span> ⲟⲩⲛ ⲙ̅ⲡⲛⲟⲩⲥ ⲛ̅ⲧⲉⲗⲓⲟⲥ ϩⲓⲧ̅ⲙ̅ ⲡϯ ⲙ̅ⲛ̅ <text:line-break/><text:span text:style-name="T1"> </text:span><text:span text:style-name="T2">(12/26) </text:span> ⲧⲉⲩⲇⲟⲕⲓⲁ ⲙ̅ⲡⲛⲟϭ ⲛ̅ⲁϩⲟⲣⲁⲧⲟⲛ ⲛ̅ ⲡ̅ⲛ̅ⲁ̅ <text:line-break/><text:span text:style-name="T1"> </text:span><text:span text:style-name="T2">(13/1) </text:span> ⲙ̅ⲡⲉⲙⲧⲟ ⲉⲃ̣[ⲟⲗ] ⲙ̣̅ⲡⲁⲩⲧⲟⲅⲉⲛⲏ[ⲥ] ⲡⲣⲱ‐ <text:line-break/><text:span text:style-name="T1"> </text:span><text:span text:style-name="T2">(13/2) </text:span> ⲙⲉ ⲛ̅ⲧⲉⲗⲓⲟⲥ ⲙ̣̅ⲙⲏⲉ ⲡϩⲁⲅⲓⲟⲥ ⲡⲉϩⲟⲩ‐ <text:line-break/><text:span text:style-name="T1"> </text:span><text:span text:style-name="T2">(13/3) </text:span> ⲉⲓⲧ· ⲛ̅ⲧⲁϥⲟⲩⲱⲛϩ ⲉⲃⲟⲗ ⲁⲩⲙⲟⲩⲧⲉ ⲉ‐ <text:line-break/><text:span text:style-name="T1"> </text:span><text:span text:style-name="T2">(13/4) </text:span> ⲡⲉϥⲣⲁⲛ ϫⲉ ⲁⲇⲁⲙⲁⲥ ⲁⲩⲁⲡⲟⲕⲁⲑⲓ‐ <text:line-break/><text:span text:style-name="T1"> </text:span><text:span text:style-name="T2">(13/5) </text:span> ⲥⲧⲁ ⲙ̅ⲙⲟϥ ⲉⲡⲉϥϩⲟⲩⲉⲓⲧ· ⲛ̅ⲁⲓⲱⲛ <text:line-break/><text:span text:style-name="T1"> </text:span><text:span text:style-name="T2">(13/6) </text:span> ϩⲁⲧ̅ⲙ̅ ⲡⲛⲟϭ ⲛⲁⲩⲧⲟⲅⲉⲛⲏⲥ ⲛ̅ⲛⲟⲩⲧⲉ <text:line-break/><text:span text:style-name="T1"> </text:span><text:span text:style-name="T2">(13/7) </text:span> ⲛ̅ⲭ̅ⲣ̅ⲥ̅ ϩ̅ⲙ̅ ⲡⲉϩⲟⲩⲉⲓⲧ· ⲛ̅ⲁⲓⲱⲛ ϩⲁⲧ̅ⲛ̅ <text:line-break/><text:span text:style-name="T1"> </text:span><text:span text:style-name="T2">(13/8) </text:span> ϩⲁⲣⲙⲟⲍⲏⲗ· ⲉⲣⲉ ⲛⲉϥⲇⲩⲛⲁⲙⲓⲥ ⲛ̅ⲙ̅ <text:line-break/><text:span text:style-name="T1"> </text:span><text:span text:style-name="T2">(13/9) </text:span> ⲙⲁϥ ⲁⲩⲱ ⲁϥϯ ⲛⲁϥ ⲛ̅ϭⲓ ⲡⲁϩⲟⲣⲁⲧⲟⲛ <text:line-break/><text:span text:style-name="T1"> </text:span><text:span text:style-name="T2">(13/10) </text:span> ⲛ̅ⲟⲩⲇⲩⲛⲁⲙⲓⲥ ⲛ̅ⲁⲧϫⲣⲟ ⲉⲣⲟⲥ ⲛ̅ⲟⲉ‐ <text:line-break/><text:span text:style-name="T1"> </text:span><text:span text:style-name="T2">(13/11) </text:span> ⲣⲁ· ⲁⲩⲱ ⲡⲉϫⲁϥ ϫⲉ ϯϯ ⲉⲟⲟⲩ ⲁⲩⲱ <text:line-break/><text:span text:style-name="T1"> </text:span><text:span text:style-name="T2">(13/12) </text:span> ϯⲥⲙⲟⲩ ⲉⲡⲓⲁϩⲟⲣⲁⲧⲟⲛ ⲛ̅ⲡ̅ⲛ̅ⲁ̅ ⲉⲧⲃⲏ <text:line-break/><text:span text:style-name="T1"> </text:span><text:span text:style-name="T2">(13/13) </text:span> ⲏⲧⲕ ⲛ̅ⲕⲁ ⲛⲓⲙ ⲉⲩϣⲟⲟⲡ· ⲉϩⲟⲩⲛ ⲉⲣⲟⲕ <text:line-break/><text:span text:style-name="T1"> </text:span><text:span text:style-name="T2">(13/14) </text:span> ⲁⲛⲟⲕ ϯⲥⲙⲟⲩ ⲉⲣⲟⲕ ⲁⲩⲱ ⲡ̅ⲁ̅ⲩ̅ⲧ̅ⲟ̅ⲅ̅ⲉ̅‐ <text:line-break/><text:span text:style-name="T1"> </text:span><text:span text:style-name="T2">(13/15) </text:span> ⲛ̅ⲏ̅ⲥ̅ ⲁⲩⲱ ⲡⲁⲓⲱⲛ ⲡϣⲟⲙⲛⲧ· ⲡ̅ⲓⲱⲧ̅ <text:line-break/><text:span text:style-name="T1"> </text:span><text:span text:style-name="T2">(13/16) </text:span> ⲧⲙ̅ⲁ̅ⲁ̅ⲩ̅ ⲡϣ̅ⲏⲣⲉ̅ ⲧⲇⲩⲛⲁⲙⲓⲥ ⲉⲧϫⲏⲕ <text:line-break/><text:span text:style-name="T1"> </text:span><text:span text:style-name="T2">(13/17) </text:span> ⲉⲃⲟⲗ· ⲁⲩⲱ ⲁⲩⲁⲡⲟⲕⲁⲑⲓⲥⲧⲁ ⲛ̅ⲡⲉϥϣⲏ‐ <text:line-break/><text:span text:style-name="T1"> </text:span><text:span text:style-name="T2">(13/18) </text:span> ⲣⲉ ⲥⲏⲑ ϩ̅ⲙ̅ ⲡⲙⲉϩⲥⲛⲁⲩ ⲛ̅ⲁⲓⲱⲛ ϩⲁⲧ̅ⲙ̅ <text:line-break/><text:span text:style-name="T1"> </text:span><text:span text:style-name="T2">(13/19) </text:span> ⲡⲙⲉϩⲥⲛⲁⲩ ⲛ̅ⲟⲩⲟⲉⲓⲛ ⲟⲣⲟⲓ̈ⲁⲏⲗ· ϩ̅ⲙ̅ <text:line-break/><text:span text:style-name="T1"> </text:span><text:span text:style-name="T2">(13/20) </text:span> ⲡⲙⲉϩϣⲟⲙ̅ⲛ̅ⲧ ⲛ̅ⲁⲓⲱⲛ ⲁⲩⲁⲡⲟⲕⲁ‐ <text:line-break/><text:span text:style-name="T1"> </text:span><text:span text:style-name="T2">(13/21) </text:span> ⲑⲓⲥⲧⲁ ⲙ̅ⲡⲉⲥⲡⲉⲣⲙⲁ ⲛ̅ⲥⲏⲑ ⲛ̅ⲛⲉ‐ <text:line-break/><text:span text:style-name="T1"> </text:span><text:span text:style-name="T2">(13/22) </text:span> ⲯⲩⲭⲟⲟⲩⲉ ⲛ̅ⲛⲉⲧⲟⲩⲁⲁⲃ· ⲛⲁⲓ̈ ⲉⲛⲉⲩ‐ <text:line-break/><text:span text:style-name="T1"> </text:span><text:span text:style-name="T2">(13/23) </text:span> ϣⲟⲟⲡ· ⲡⲉ ϩ̅ⲙ̅ ⲡⲁⲓⲱⲛ ϩⲁⲧ̅ⲙ̅ ⲡⲙⲉϩ‐ <text:line-break/><text:soft-page-break/><text:span text:style-name="T1"> </text:span><text:span text:style-name="T2">(14/1) </text:span> ϣⲟⲙⲛⲧ· ⲛ̅ⲟⲩⲟⲉⲓ[ⲛ] ⲇ̣ⲁⲩⲉⲓⲑⲉ ϩ̅ⲙ̅ <text:line-break/><text:span text:style-name="T1"> </text:span><text:span text:style-name="T2">(14/2) </text:span> ⲡⲙⲉϩϥⲧⲟⲟⲩ ⲛ̅ⲁⲓⲱⲛ ⲁⲩⲁⲡⲟⲕⲁⲑⲓ‐ <text:line-break/><text:span text:style-name="T1"> </text:span><text:span text:style-name="T2">(14/3) </text:span> ⲥⲧⲁ ⲛ̅ⲙ̅ⲯⲩⲭⲟⲟⲩⲉ ⲛ̅ⲛⲉⲣⲥⲟⲩⲱⲛ <text:line-break/><text:span text:style-name="T1"> </text:span><text:span text:style-name="T2">(14/4) </text:span> ⲡⲉⲩⲡⲗⲏⲣⲱⲙⲁ ⲉⲙⲡⲟⲩⲙⲉⲧⲁⲛⲟⲉⲓ <text:line-break/><text:span text:style-name="T1"> </text:span><text:span text:style-name="T2">(14/5) </text:span> ϩ̅ⲛ̅ ⲟⲩϭⲗⲁⲙ ⲁⲗⲗⲁ ⲁⲩϭⲱ ⲛ̅ⲟⲩⲟⲉⲓϣ· ⲙⲛ <text:line-break/><text:span text:style-name="T1"> </text:span><text:span text:style-name="T2">(14/6) </text:span> ⲛ̅ⲥⲱⲥ ⲁⲩⲙⲉⲧⲁⲛⲟⲉⲓ ⲉⲩⲛⲁϭⲱ ϩⲁⲧ̅ⲙ̅ <text:line-break/><text:span text:style-name="T1"> </text:span><text:span text:style-name="T2">(14/7) </text:span> ⲡⲟⲩⲟⲉⲓⲛ ⲛ̅ⲏ̅ⲗ̅ⲏ̅ⲗ̅ⲏ̣̅̅ⲑ· ⲉⲩⲥⲟⲟⲩϩ· <text:line-break/><text:span text:style-name="T1"> </text:span><text:span text:style-name="T2">(14/8) </text:span> ⲉⲡⲙⲁ ⲉⲧ̅ⲙ̅ⲙⲁⲩ ⲉⲩϯ ⲉⲟⲟⲩ ⲙ̅ⲡⲁ‐ <text:line-break/><text:span text:style-name="T1"> </text:span><text:span text:style-name="T2">(14/9) </text:span> ϩⲟⲣⲁⲧⲟⲛ ⲙ̅ⲡ̅ⲛ̅ⲁ̅· ⲧⲉⲛϣⲃ̅ⲣ̅ⲥⲱⲛⲉ ⲟⲩ‐ <text:line-break/><text:span text:style-name="T1"> </text:span><text:span text:style-name="T2">(14/10) </text:span> ⲛ̅ ⲧⲥⲟⲫⲓⲁ ⲉⲩⲁⲓⲱⲛ ⲧⲉ· ⲁⲥⲙⲉⲉⲩⲉ <text:line-break/><text:span text:style-name="T1"> </text:span><text:span text:style-name="T2">(14/11) </text:span> ⲉⲩⲙⲉⲉⲩⲉ ⲉⲃⲟⲗ ⲛ̅ϩⲏⲧ̅ⲥ̅ ϩ̅ⲛ̅ ⲧⲉⲛⲑⲩ‐ <text:line-break/><text:span text:style-name="T1"> </text:span><text:span text:style-name="T2">(14/12) </text:span> ⲙⲏⲥⲓⲥ ⲙ̅ⲡⲉⲡ̅ⲛ̅ⲁ̅· ⲙⲛ̅ ⲡϣⲣⲡ· ⲛ̅ⲥⲟⲟⲩⲛ <text:line-break/><text:span text:style-name="T1"> </text:span><text:span text:style-name="T2">(14/13) </text:span> ⲁⲥⲣ̅ϩⲛⲁⲥ ⲛ̅ⲟⲩⲱⲛϩ ⲙ̅ⲡⲉⲥⲉⲓⲛⲉ ⲉⲃⲟⲗ <text:line-break/><text:span text:style-name="T1"> </text:span><text:span text:style-name="T2">(14/14) </text:span> ⲛ̅ϩⲏⲧ̅ⲥ̅·[ⲙ̅ⲡⲉ ⲧⲉⲥⲉⲛⲑⲩⲙⲏⲥⲓⲥ ϣⲱⲡⲉ <text:line-break/><text:span text:style-name="T1"> </text:span><text:span text:style-name="T2">(14/15) </text:span> ⲛ̅ⲁⲣⲅⲟⲛ ⲁⲩⲱ ⲁ ⲡⲉⲥϩⲱⲃ ⲉⲓ ⲉⲃⲟⲗ ⲛ̅‐ <text:line-break/><text:span text:style-name="T1"> </text:span><text:span text:style-name="T2">(14/16) </text:span> ⲁⲧⲉⲗⲉⲥⲧⲟⲛ ⲉⲙ̅ⲛ̅ⲧ̅ϥ̅ ⲙⲟⲣⲫⲏ ϩ̅ⲛ̅ ⲧⲉⲥ‐ <text:line-break/><text:span text:style-name="T1"> </text:span><text:span text:style-name="T2">(14/17) </text:span> ⲙⲟⲣⲫⲏ ⲉⲃⲟⲗ ϫⲉ ⲁⲥⲁⲁⲥ ⲭⲱⲣⲓⲥ ⲡⲉⲥ‐ <text:line-break/><text:span text:style-name="T1"> </text:span><text:span text:style-name="T2">(14/18) </text:span> ⲥⲩⲛⲍⲩⲅⲟⲥ ⲉⲙ̅ⲛ̅ⲧ̅ϥ̅ ⲧⲩⲡⲟⲥ ϩ̅ⲛ̅ ⲑⲓⲇⲉⲁ <text:line-break/><text:span text:style-name="T1"> </text:span><text:span text:style-name="T2">(14/19) </text:span> ⲙ̅ⲧⲙⲁⲁⲩ·] ⲙ̅ⲡⲉϥⲉⲩⲇⲟⲕⲓ ⲛ̅ϭⲓ ⲡⲉⲡ̅ⲛ̅ⲁ̅ <text:line-break/><text:span text:style-name="T1"> </text:span><text:span text:style-name="T2">(14/20) </text:span> ⲟⲩⲇⲉ ⲙ̅ⲡ̅ϥ̅ⲕⲁⲧⲁⲛⲉⲩⲉ ⲟⲩⲇⲉ ⲙ̅ⲡ̅ϥ̅‐ <text:line-break/><text:span text:style-name="T1"> </text:span><text:span text:style-name="T2">(14/21) </text:span> ⲥⲩⲛⲉⲩⲇⲟⲕⲉⲓ ⲛ̅ϭⲓ ⲡⲉⲥⲥⲩⲛⲍⲩⲅⲟⲥ <text:line-break/><text:span text:style-name="T1"> </text:span><text:span text:style-name="T2">(14/22) </text:span> ⲡⲉⲡ̅ⲛ̅ⲁ̅ ⲙ̅ⲙ̅ⲛ̅ⲧϩⲟⲟⲩⲧ· ⲙ̅ⲡⲁⲣⲑⲉ‐ <text:line-break/><text:span text:style-name="T1"> </text:span><text:span text:style-name="T2">(14/23) </text:span> ⲛⲓⲕⲟⲛ ⲉⲙⲡⲉⲥϭⲓⲛⲉ ϭⲉ ⲙ̅ⲡⲉⲥⲥⲩⲛ‐ <text:line-break/><text:span text:style-name="T1"> </text:span><text:span text:style-name="T2">(14/24) </text:span> ⲍⲩⲅⲟⲥ ⲁⲥⲕⲁⲧⲁⲛⲉⲩⲉ ⲭⲱⲣⲓⲥ ⲧⲉⲩⲇⲟ‐ <text:line-break/><text:span text:style-name="T1"> </text:span><text:span text:style-name="T2">(15/1) </text:span> ⲕⲓⲁ ⲙ̅ⲡⲉⲡ̅ⲛ̅ⲁ̅ ⲙ̅ⲛ̅ ⲡⲥⲟⲟⲩⲛ ⲙ̅ⲡⲉⲥ‐ <text:line-break/><text:span text:style-name="T1"> </text:span><text:span text:style-name="T2">(15/2) </text:span> ϩⲓⲇⲓⲟⲛ ⲛ̅ⲥⲩⲙⲫⲱⲛⲟⲛ ⲛⲉⲥϫⲏⲕ <text:line-break/><text:span text:style-name="T1"> </text:span><text:span text:style-name="T2">(15/3) </text:span> ⲉⲃⲟⲗ ⲉⲧⲃⲉ ⲡⲉⲫⲣⲟⲩⲣⲓⲕⲟⲛ ⲉⲧⲛ̅‐ <text:line-break/><text:span text:style-name="T1"> </text:span><text:span text:style-name="T2">(15/4) </text:span> ϩⲏⲧ̅ⲥ̅· ⲙ̅ⲡⲉ ⲧⲉⲥⲉⲛⲑⲩⲙⲏⲥⲓⲥ ϣⲱ‐ <text:line-break/><text:span text:style-name="T1"> </text:span><text:span text:style-name="T2">(15/5) </text:span> ⲡⲉ ⲛ̅ⲁⲣⲅⲟⲛ ⲁⲩⲱ ⲁ ⲡⲉⲥϩⲱⲃ ⲉⲓ ⲉⲃⲟⲗ <text:line-break/><text:span text:style-name="T1"> </text:span><text:span text:style-name="T2">(15/6) </text:span> ⲛ̅ⲁⲧⲉⲗⲉⲥⲧⲟⲛ ⲉⲙ̅ⲛ̅ⲧ̅ϥ̅ ⲙⲟⲣⲫⲏ ϩ̅ⲛ̅ <text:line-break/><text:span text:style-name="T1"> </text:span><text:span text:style-name="T2">(15/7) </text:span> ⲧⲉⲥⲙⲟⲣⲫⲏ ⲉⲃⲟⲗ ϫⲉ ⲁⲥⲁⲁⲥ ⲭⲱⲣⲓⲥ <text:line-break/><text:span text:style-name="T1"> </text:span><text:span text:style-name="T2">(15/8) </text:span> ⲡⲉⲥⲥⲩⲛⲍⲩⲅⲟⲥ ⲉⲙ̅ⲛ̅ⲧ̅ϥ̅ ⲧⲩⲡⲟⲥ <text:line-break/><text:span text:style-name="T1"> </text:span><text:span text:style-name="T2">(15/9) </text:span> ϩ̅ⲛ̅ ⲧϩⲓⲇⲉⲁ ⲛ̅ⲧⲙⲁⲁⲩ ⲁⲥⲛⲁⲩ ⲉⲣⲟϥ <text:line-break/><text:span text:style-name="T1"> </text:span><text:span text:style-name="T2">(15/10) </text:span> ϩ̅ⲙ̅ ⲡⲉⲥⲥⲁϫⲛⲉ ϫⲉ ⲁϥϣⲱⲡⲉ ⲛ̅ⲕⲉ‐ <text:line-break/><text:span text:style-name="T1"> </text:span><text:span text:style-name="T2">(15/11) </text:span> ⲙⲟⲣⲫⲏ ⲛ̅ϩⲁ ⲛ̅ⲙⲟⲩⲉⲓ ⲛ̅ϩⲁ ⲛ̅ϩⲁϥ <text:line-break/><text:span text:style-name="T1"> </text:span><text:span text:style-name="T2">(15/12) </text:span> ⲛⲉⲣⲉ ⲛⲉϥⲃⲁⲗ ⲣ̅ⲟⲩⲟⲉⲓⲛ ϩ̅ⲛ̅ ⲟⲩⲕⲣⲱⲙ <text:line-break/><text:span text:style-name="T1"> </text:span><text:span text:style-name="T2">(15/13) </text:span> ⲁⲥⲥⲓⲧⲉ ⲙ̅ⲙⲟϥ ⲉⲃⲟⲗ ⲙ̅ⲙⲟⲥ ⲙⲡⲃⲟⲗ <text:line-break/><text:span text:style-name="T1"> </text:span><text:span text:style-name="T2">(15/14) </text:span> ⲛ̅ⲛ̅ⲧⲟⲡⲟⲥ ⲉⲧ̅ⲙ̅ⲙⲁⲩ ϫⲉ ⲛ̅ⲛⲉ ⲗⲁⲁⲩ <text:line-break/><text:span text:style-name="T1"> </text:span><text:span text:style-name="T2">(15/15) </text:span> ⲛ̅ⲁⲑⲁⲛⲁⲧⲟⲥ ⲛⲁⲩ ⲉⲣⲟϥ· ϫⲉ ⲁⲩϫⲡⲟϥ <text:line-break/><text:span text:style-name="T1"> </text:span><text:span text:style-name="T2">(15/16) </text:span> ϩ̅ⲛ̅ ⲟⲩⲙ̅ⲛⲧ̅ⲁⲧⲥⲟⲟⲩⲛ· ⲁⲥⲛⲟⲩϩ̅ⲃ̅ ⲛ̅ⲙ̅ <text:line-break/><text:span text:style-name="T1"> </text:span><text:span text:style-name="T2">(15/17) </text:span> ⲙⲁϥ ⲛ̅ⲟⲩϭⲏⲡⲉ ⲛ̅ⲟⲩⲟⲉⲓⲛ ⲁⲩⲱ ⲁⲥⲕⲱ <text:line-break/><text:span text:style-name="T1"> </text:span><text:span text:style-name="T2">(15/18) </text:span> ⲛ̅ⲟⲩⲑⲣⲟⲛⲟⲥ ϩ̅ⲛ̅ ⲧⲙⲏⲧⲉ ⲛ̅ⲧⲕⲏⲡⲉ ϫⲉ <text:line-break/><text:span text:style-name="T1"> </text:span><text:span text:style-name="T2">(15/19) </text:span> ⲛ̅ⲛⲉ ⲗⲁⲁⲩ ⲛⲁⲩ ⲉⲣⲟϥ ⲉⲓⲙⲏⲧⲓ ⲡϩⲁ‐ <text:line-break/><text:span text:style-name="T1"> </text:span><text:span text:style-name="T2">(15/20) </text:span> ⲅⲓⲟⲛ ⲛ̅ⲡ̅ⲛ̅ⲁ̅ ⲡⲁⲓ̈ ⲉϣⲁⲩϫⲟⲟⲥ ⲉⲣⲟϥ <text:line-break/><text:span text:style-name="T1"> </text:span><text:span text:style-name="T2">(15/21) </text:span> ϫⲉ ⲧⲙⲁⲁ̣ⲩ ⲛ̅ⲛⲉⲧⲟⲛϩ ⲧⲏⲣⲟⲩ ⲁⲩⲱ ⲁ‐ <text:line-break/><text:span text:style-name="T1"> </text:span><text:span text:style-name="T2">(15/22) </text:span> ⲥϯ ⲣⲁⲛ ⲉⲣⲟϥ ϫⲉ ⲓ̅̈̅ⲁ̅ⲗ̅ⲇ̅ⲁ̅ⲃ̅ⲁ̅ⲱ̅ⲑ̅· ⲡⲁⲓ̈ <text:line-break/><text:span text:style-name="T1"> </text:span><text:span text:style-name="T2">(15/23) </text:span> ⲡⲉ ⲡⲉϩⲟⲩⲉⲓⲧ· ⲛ̅ⲁⲣⲭⲱⲛ ⲉⲁϥⲧⲱⲕⲉ <text:line-break/><text:soft-page-break/><text:span text:style-name="T1"> </text:span><text:span text:style-name="T2">(15/24) </text:span> ⲛ̅ⲟⲩⲇⲩⲛⲁⲙⲓⲥ ⲉⲛⲁϣⲱⲥ ⲉⲃⲟⲗ ϩ̅ⲛ̅ <text:line-break/><text:span text:style-name="T1"> </text:span><text:span text:style-name="T2">(16/1) </text:span> ⲧⲙⲁⲁⲩ ⲁⲩⲱ ⲁϥⲥⲁϩⲱϥ ⲉⲃⲟⲗ ⲙ̅ⲙⲟⲥ <text:line-break/><text:span text:style-name="T1"> </text:span><text:span text:style-name="T2">(16/2) </text:span> ⲁϥⲡⲱⲱⲛⲉ ⲉⲃⲟⲗ ϩ̅ⲛ̅ ⲟⲩⲧⲟⲡⲟⲥ ⲉⲩⲧⲟ‐ <text:line-break/><text:span text:style-name="T1"> </text:span><text:span text:style-name="T2">(16/3) </text:span> ⲧⲟⲥ ϩ̅ⲙ̅ ⲡⲙⲁ ⲛ̅ⲧⲁⲩϫⲡⲟϥ ⲛ̅ϩⲏⲧϥ ⲁϥ‐ <text:line-break/><text:span text:style-name="T1"> </text:span><text:span text:style-name="T2">(16/4) </text:span> ⲉⲙⲁϩⲧⲉ ⲛ̅ϩⲉⲛⲕⲉⲧⲟⲡⲟⲥ· ⲁϥⲧⲁⲙⲓⲟ <text:line-break/><text:span text:style-name="T1"> </text:span><text:span text:style-name="T2">(16/5) </text:span> ⲛⲁϥ ⲛ̅ⲟⲩⲁⲓⲱⲛ ⲛ̅ϣⲁϩ ⲛ̅ⲕⲣⲱⲙ ⲛ̅‐ <text:line-break/><text:span text:style-name="T1"> </text:span><text:span text:style-name="T2">(16/6) </text:span> ⲟⲩⲟⲉⲓⲛ ⲡⲉⲧ̅ϥ̅ ⲛ̅ϩⲏⲧ̅ϥ̅ ⲧⲉⲛⲟⲩ <text:line-break/><text:span text:style-name="T1"> </text:span><text:span text:style-name="T2">(16/7) </text:span> ⲁϥⲛⲟⲩϩ̅ⲃ̅ ⲙ̅ⲛ̅ ⲧⲙ̅ⲛⲧ̅ⲁⲧⲥⲟⲟⲩⲛ ⲉⲧ̅ⲛ̅ <text:line-break/><text:span text:style-name="T1"> </text:span><text:span text:style-name="T2">(16/8) </text:span> ⲉⲙⲁϥ ⲁϥϫⲡⲟ ⲛ̅ⲛⲉⲝⲟⲩⲥⲓⲁ ⲉⲧϩⲁ‐ <text:line-break/><text:span text:style-name="T1"> </text:span><text:span text:style-name="T2">(16/9) </text:span> ⲣⲟϥ ⲙ̅ⲛ̅ ⲡⲙ̅ⲛ̅ⲧ̅ⲥ̅ⲛⲟⲟ̣ⲩⲥ ⲛ̅ⲁⲅⲅⲉⲗⲟⲥ <text:line-break/><text:span text:style-name="T1"> </text:span><text:span text:style-name="T2">(16/10) </text:span> ⲁⲩⲱ ⲡⲟⲩⲁ ⲡⲟⲩⲁ ⲙ̅ⲙⲟⲟⲩ ⲛ̅ⲛⲟⲩⲁⲓⲱⲛ <text:line-break/><text:span text:style-name="T1"> </text:span><text:span text:style-name="T2">(16/11) </text:span> ⲉⲡⲧⲩⲡⲟⲥ ⲛ̅ⲛⲓⲁⲫⲑⲁⲣⲧⲟⲥ· ⲁⲩⲧⲁⲙⲓⲟ <text:line-break/><text:span text:style-name="T1"> </text:span><text:span text:style-name="T2">(16/12) </text:span> ⲛⲁⲩ ⲛ̅ⲥⲁϣϥ ⲛ̅ⲁⲅⲅⲉⲗⲟⲥ ⲁⲩⲱ ⲛ̅ⲁⲅⲅⲉ‐ <text:line-break/><text:span text:style-name="T1"> </text:span><text:span text:style-name="T2">(16/13) </text:span> ⲗⲟⲥ ⲛ̅ϣⲟⲙⲧⲉ ⲛ̅ⲇⲩⲛⲁⲙⲓⲥ ⲕⲁⲧⲁ ⲡⲓ‐ <text:line-break/><text:span text:style-name="T1"> </text:span><text:span text:style-name="T2">(16/14) </text:span> ⲛⲉ ⲛ̅ⲡⲓϣⲟⲣⲡ· ⲛ̅ⲧⲩⲡⲟⲥ ⲡⲏ ⲉⲧϩⲁ‐ <text:line-break/><text:span text:style-name="T1"> </text:span><text:span text:style-name="T2">(16/15) </text:span> ⲧⲉϥⲉϩⲏ ⲛⲉⲝⲟⲩⲥⲓⲁ ⲛ̅ⲧⲁⲩⲟⲩⲱⲛϩ· <text:line-break/><text:span text:style-name="T1"> </text:span><text:span text:style-name="T2">(16/16) </text:span> ϩ̅ⲙ̅ ⲡⲁⲣⲭⲓⲅⲉⲛⲉⲧⲱⲣ· ⲡⲉϩⲟⲩⲉⲓⲧ· ⲛ̅‐ <text:line-break/><text:span text:style-name="T1"> </text:span><text:span text:style-name="T2">(16/17) </text:span> ⲁⲣⲭⲱⲛ ⲛ̅ⲧⲉ ⲡⲕⲁⲕⲉ ⲙ̅ⲛ̅ ⲧⲙ̅ⲛ̅ⲧⲁⲧⲥⲟ‐ <text:line-break/><text:span text:style-name="T1"> </text:span><text:span text:style-name="T2">(16/18) </text:span> ⲟⲩⲛ ϩⲁⲙⲁ ⲛⲉⲝⲟⲩⲥⲓⲁ ⲛⲉⲩ ϩ̅ⲛ̅ ⲧⲙⲛ‐ <text:line-break/><text:span text:style-name="T1"> </text:span><text:span text:style-name="T2">(16/19) </text:span> ⲧⲁⲧⲥⲟⲟⲩⲛ ⲙ̅ⲡⲉⲛⲧⲁϥϫⲡⲟⲟⲩ ⲉⲧⲉ <text:line-break/><text:span text:style-name="T1"> </text:span><text:span text:style-name="T2">(16/20) </text:span> ⲛⲁⲓ̈ ⲛⲉ ⲛⲉⲩⲣⲁⲛ· ⲡⲉϩⲟⲩⲉⲓⲧ· ⲡⲉ ϩ̅ⲁ̅ⲱ̅ⲑ̅ <text:line-break/><text:span text:style-name="T1"> </text:span><text:span text:style-name="T2">(16/21) </text:span> ⲡⲙⲉϩⲥⲛⲁⲩ ⲡⲉ ϩⲁⲣⲙⲁⲥ ⲉⲧⲉ ⲡⲁⲓ̈ ⲡⲉ <text:line-break/><text:span text:style-name="T1"> </text:span><text:span text:style-name="T2">(16/22) </text:span> ⲡⲃⲁⲗ ⲙ̅ⲡⲕⲱϩⲧ· ⲡⲙⲉϩϣⲟ̣ⲙ̅ⲛ̅ⲧ̅ ⲡⲉ <text:line-break/><text:span text:style-name="T1"> </text:span><text:span text:style-name="T2">(16/23) </text:span> ⲅⲁⲗⲓⲗⲁ ⲡⲙⲉϩϥⲧⲟⲟⲩ ⲡⲉ ⲓ̈ⲱⲃⲏⲗ· ⲡⲙⲉϩ‐ <text:line-break/><text:span text:style-name="T1"> </text:span><text:span text:style-name="T2">(16/24) </text:span> ϯⲟⲩ ⲡⲉ ⲁⲇⲱⲛⲁⲓⲟⲥ ⲡⲙⲉϩⲥⲟⲟⲩ ⲡⲉ ⲥⲁ‐ <text:line-break/><text:span text:style-name="T1"> </text:span><text:span text:style-name="T2">(16/25) </text:span> ⲃⲁⲱⲑ· ⲡⲙⲉϩⲥⲁϣϥ ⲡⲉ ⲕⲁⲓ̈ⲛⲁⲛ ⲕⲁⲥⲓⲛ <text:line-break/><text:span text:style-name="T1"> </text:span><text:span text:style-name="T2">(17/1) </text:span> ⲡⲉ ϣⲁⲩⲙⲟⲩⲧⲉ ⲉⲣⲟϥ ϫⲉ ⲡⲣⲏ· ⲡⲙⲉϩ‐ <text:line-break/><text:span text:style-name="T1"> </text:span><text:span text:style-name="T2">(17/2) </text:span> ϣⲙⲟⲩⲛ ⲡⲉ ⲁⲃⲓⲣⲉⲥⲥⲓⲁ· ⲡⲙⲉϩⲯⲓⲥ <text:line-break/><text:span text:style-name="T1"> </text:span><text:span text:style-name="T2">(17/3) </text:span> ⲡⲉ ⲓ̈ⲱⲃⲏⲗ· ⲡⲙⲉϩⲙⲏⲧ· ⲡⲉ ⲁⲣⲙⲟⲩⲡⲓ‐ <text:line-break/><text:span text:style-name="T1"> </text:span><text:span text:style-name="T2">(17/4) </text:span> ⲁⲏⲗ· ⲡⲙⲉϩⲙ̅ⲛ̅ⲧⲟⲩⲏⲉ ⲡⲉ ⲁⲇⲱⲛⲓⲛ <text:line-break/><text:span text:style-name="T1"> </text:span><text:span text:style-name="T2">(17/5) </text:span> ⲡⲙⲉϩⲙ̅ⲛ̅ⲧ̅ⲥⲟⲟⲩⲥ ⲡⲉ ⲃⲉⲗⲓⲁⲥ· ⲟⲩ̅ⲛ̅ <text:line-break/><text:span text:style-name="T1"> </text:span><text:span text:style-name="T2">(17/6) </text:span> ⲧⲁⲩ ⲙⲉⲛ̅ ⲛ̅ϩⲉⲛⲕⲉⲣⲁⲛ ⲉⲃⲟⲗ ϩ̅ⲛ̅ ⲛⲉⲡⲓ‐ <text:line-break/><text:span text:style-name="T1"> </text:span><text:span text:style-name="T2">(17/7) </text:span> ⲑⲩⲙⲓⲁ ⲙ̅ⲛ̅ ⲟⲣⲅⲏ ⲛⲁⲓ̈ ⲧⲏⲣⲟⲩ ϩⲁⲡⲗⲱⲥ <text:line-break/><text:span text:style-name="T1"> </text:span><text:span text:style-name="T2">(17/8) </text:span> ⲛⲉⲩⲣⲁⲛ ⲥⲉⲕⲏⲃ· ⲉϣⲁⲩⲙⲟⲩⲧⲉ ⲉⲣⲟⲟⲩ <text:line-break/><text:span text:style-name="T1"> </text:span><text:span text:style-name="T2">(17/9) </text:span> ⲛ̅ϩⲏⲧⲟⲩ ⲉⲃⲟⲗ ϩⲓⲧⲟⲟⲧⲟⲩ ⲛ̅ⲛⲓⲉⲟⲟⲩ <text:line-break/><text:span text:style-name="T1"> </text:span><text:span text:style-name="T2">(17/10) </text:span> ⲙ̅ⲡⲥⲁ ⲛϩⲣⲉ ⲉⲁⲩⲙⲟⲩⲧⲉ ⲉⲣⲟⲟⲩ ⲕⲁⲧⲁ <text:line-break/><text:span text:style-name="T1"> </text:span><text:span text:style-name="T2">(17/11) </text:span> ⲧⲁⲗⲏⲑⲉⲓⲁ ϣⲁⲩⲟⲩⲱⲛϩ ⲉⲃⲟⲗ ⲛ̅ⲧⲉⲩ‐ <text:line-break/><text:span text:style-name="T1"> </text:span><text:span text:style-name="T2">(17/12) </text:span> ⲫⲩⲥⲓⲥ ⲁⲩⲱ ⲁϥⲙⲟⲩⲧⲉ ⲉⲣⲟⲟⲩ ⲛ̅ϭⲓ ⲥⲁ‐ <text:line-break/><text:span text:style-name="T1"> </text:span><text:span text:style-name="T2">(17/13) </text:span> ⲕⲗⲁⲥ ⲛ̅ϩⲣⲁⲓ̈ ϩ̅ⲛ̅ ⲛⲉⲩⲣⲁⲛ ⲡⲣⲟⲥ ⲧⲉ <text:line-break/><text:span text:style-name="T1"> </text:span><text:span text:style-name="T2">(17/14) </text:span> ⲫⲁⲛⲧⲁⲥⲓⲁ̣ ⲙ̅ⲛ̅ ⲛ̅ⲉⲩϭⲟⲙ· ⲉⲃⲟⲗ ⲟⲩⲛ <text:line-break/><text:span text:style-name="T1"> </text:span><text:span text:style-name="T2">(17/15) </text:span> ϩⲓⲧⲟⲟⲧⲟⲩ ⲛ̅ⲛⲓⲉⲟⲟⲩ ϣⲁⲣⲟⲩⲥⲁϩⲱ <text:line-break/><text:span text:style-name="T1"> </text:span><text:span text:style-name="T2">(17/16) </text:span> ⲟⲩ ⲛ̅ⲥⲉⲣ̅ϭⲱⲃ· ϩⲓⲧ̅ⲛ̅ ⲛⲁⲓ̈ ϣⲁⲣⲟⲩϭⲙ <text:line-break/><text:span text:style-name="T1"> </text:span><text:span text:style-name="T2">(17/17) </text:span> ϭⲟ̣ⲙ ⲛ̅ⲥⲉⲁⲩⲝⲁⲛⲉ· ⲁⲩⲱ ⲁϥⲕⲉⲗⲉⲩⲉ <text:line-break/><text:span text:style-name="T1"> </text:span><text:span text:style-name="T2">(17/18) </text:span> ⲉⲧⲣⲉ ⲥⲁϣϥ ⲉⲣ̅ ⲣ̅ⲣⲟ ⲉϩⲣⲁⲓ̈ ⲉϫ̅ⲛ̅ ⲙⲡⲏ‐ <text:line-break/><text:span text:style-name="T1"> </text:span><text:span text:style-name="T2">(17/19) </text:span> ⲟⲩⲉ ⲁⲩⲱ ϯⲟⲩ ⲉϫ̅ⲙ̅ ⲡⲭⲁⲟⲥ ⲙ̅ⲛ̅ ⲁ‐ <text:line-break/><text:span text:style-name="T1"> </text:span><text:span text:style-name="T2">(17/20) </text:span> ⲙ̅ⲛ̅ⲧⲉ· ⲛⲉⲧⲛ̅ϩⲣⲁⲓ̈ ϩⲓϫ̅ⲛ̅ ⲧⲥⲁϣϥⲉ <text:line-break/><text:span text:style-name="T1"> </text:span><text:span text:style-name="T2">(17/21) </text:span> ⲙ̅ⲡⲉ· ⲛⲉⲩⲣⲁⲛ ⲛ̅ⲉⲟⲟⲩ ⲛⲉ ⲛⲁⲓ̈ ⲡⲉ <text:line-break/><text:soft-page-break/><text:span text:style-name="T1"> </text:span><text:span text:style-name="T2">(17/22) </text:span> ϩⲟⲩⲉ̣ⲓ̣ⲧ̣ ⲡⲉ ⲁⲱⲑ· ⲡϩⲁ ⲛ̅ⲙⲟⲩⲉⲓ· <text:line-break/><text:span text:style-name="T1"> </text:span><text:span text:style-name="T2">(17/23) </text:span> ⲡⲙⲉϩⲥⲛⲁⲩ ⲡⲉ ⲉⲗⲱⲁⲓⲟⲥ ⲡϩⲁ ⲛ̅ⲉⲓⲱ <text:line-break/><text:span text:style-name="T1"> </text:span><text:span text:style-name="T2">(17/24) </text:span> ⲡⲙⲉϩϣⲟⲙ̅ⲛ̅ⲧ ⲡⲉ ⲁⲥⲧⲟⲫⲁⲓⲟⲥ ⲡϩⲁ <text:line-break/><text:span text:style-name="T1"> </text:span><text:span text:style-name="T2">(18/1) </text:span> ⲛ̅ϩⲟⲉⲓⲧⲉ· ⲡⲙⲉϩϥⲧⲟⲟⲩ ⲡⲉ ⲓⲁⲍⲱ‐ <text:line-break/><text:span text:style-name="T1"> </text:span><text:span text:style-name="T2">(18/2) </text:span> ⲡϩⲁ ⲛ̅ⲇⲣⲁⲕⲱⲛ ⲛ̅ϩⲁ ⲛ̅ⲙⲟⲩⲉⲓ <text:line-break/><text:span text:style-name="T1"> </text:span><text:span text:style-name="T2">(18/3) </text:span> ⲡⲙⲉϩϯⲟⲩ ⲡⲉ ⲁⲇⲱⲛⲁⲓⲟ̣ⲥ̣ ⲡϩⲁ <text:line-break/><text:span text:style-name="T1"> </text:span><text:span text:style-name="T2">(18/4) </text:span> ⲛⲉⲇⲣⲁⲕⲱⲛ ⲡⲙⲉϩⲥⲟⲟⲩ ⲡⲉ ⲁⲇⲱ‐ <text:line-break/><text:span text:style-name="T1"> </text:span><text:span text:style-name="T2">(18/5) </text:span> ⲛⲓⲛ ⲡϩⲁ ⲛ̅ϭⲁⲡⲓ· ⲡⲙⲉϩⲥⲁϣϥ ⲡⲉ <text:line-break/><text:span text:style-name="T1"> </text:span><text:span text:style-name="T2">(18/6) </text:span> ⲥⲁⲃⲃⲁⲇⲁⲓⲟⲥ ⲡϩⲁ ⲛⲉⲕⲣⲱⲙ ⲉϥⲣ̅ <text:line-break/><text:span text:style-name="T1"> </text:span><text:span text:style-name="T2">(18/7) </text:span> ⲟⲩⲟⲉⲓⲛ· ⲧⲁⲓ̈ ⲧⲉ ⲑⲉⲃⲇⲟⲙⲁⲥ ⲙ̅ⲡⲥⲁⲃ‐ <text:line-break/><text:span text:style-name="T1"> </text:span><text:span text:style-name="T2">(18/8) </text:span> ⲃⲁⲑⲟⲛ· ⲛⲁⲓ̈ ⲛⲉⲧⲁⲙⲁϩⲧⲉ ⲉϩⲣⲁⲓ̈ ⲉϫ̅ⲙ̅ <text:line-break/><text:span text:style-name="T1"> </text:span><text:span text:style-name="T2">(18/9) </text:span> ⲡⲕⲟⲥⲙⲟⲥ ⲧⲟⲧⲉ ⲓ̈ⲁⲗⲇⲁⲃⲁⲱⲑ· ⲉⲧⲉ <text:line-break/><text:span text:style-name="T1"> </text:span><text:span text:style-name="T2">(18/10) </text:span> ⲥⲁⲕⲗⲁ ⲡⲉ· ⲡⲁ ⲡⲓⲁⲧⲟ ⲛ̅ⲙⲟⲣⲙⲏ ϩⲱⲥ‐ <text:line-break/><text:span text:style-name="T1"> </text:span><text:span text:style-name="T2">(18/11) </text:span> ⲧⲉ ⲛ̅ϥ̅ⲟⲩⲱⲛϩ ϩ̅ⲛ̅ ϩⲟ ⲛⲓⲙ ⲡⲣⲟⲥ ⲡⲉϥ‐ <text:line-break/><text:span text:style-name="T1"> </text:span><text:span text:style-name="T2">(18/12) </text:span> ϣⲁϫⲛⲉ ⲁϥⲙⲉⲣⲓⲍⲉ ⲛⲁⲩ ⲉⲃⲟⲗ ϩ̅ⲙ̅ <text:line-break/><text:span text:style-name="T1"> </text:span><text:span text:style-name="T2">(18/13) </text:span> ⲡⲉϥⲕⲣⲱⲙ· ⲉⲃⲟⲗ ⲇⲉ ϩ̅ⲙ̅ ⲡⲟⲩⲟⲉⲓⲛ <text:line-break/><text:span text:style-name="T1"> </text:span><text:span text:style-name="T2">(18/14) </text:span> ⲛ̅ϩⲓⲗⲓⲕⲣⲓⲛⲉⲥ ⲉⲧⲉ ⲧⲇⲩⲛⲁⲙⲓⲥ ⲧⲉ <text:line-break/><text:span text:style-name="T1"> </text:span><text:span text:style-name="T2">(18/15) </text:span> ⲉⲧⲁϥⲁⲡⲟⲥⲧⲁ ⲙ̅ⲙⲟⲥ ⲉⲃⲟⲗ ϩ̅ⲛ̅ ⲧⲙⲉ‐ <text:line-break/><text:span text:style-name="T1"> </text:span><text:span text:style-name="T2">(18/16) </text:span> ⲉⲩ ⲙ̅ⲡ̅ϥ̅ϯ ⲛⲁⲩ ⲙ̅ⲙⲟⲥ ⲉⲧⲃⲉ ⲡⲁⲓ̈ <text:line-break/><text:span text:style-name="T1"> </text:span><text:span text:style-name="T2">(18/17) </text:span> ⲛⲉϥⲟ ⲛ̅ϫⲟⲉⲓⲥ ⲉⲣⲟⲟⲩ ⲉⲧⲃⲉ ⲡⲉⲟⲟⲩ <text:line-break/><text:span text:style-name="T1"> </text:span><text:span text:style-name="T2">(18/18) </text:span> ⲙ̅ⲡⲟⲩⲟⲉⲓⲛ ⲛ̅ⲧⲇⲩⲛⲁⲙⲓⲥ ⲉⲧⲛ̅ϩⲏ̣ⲧ̅ϥ̅ <text:line-break/><text:span text:style-name="T1"> </text:span><text:span text:style-name="T2">(18/19) </text:span> ⲛ̅ⲧⲉ ⲧⲙⲁⲁⲩ· ⲉⲧⲃⲉ ⲡⲁⲓ̈ ⲛⲉϥⲙⲟⲩⲧⲉ <text:line-break/><text:span text:style-name="T1"> </text:span><text:span text:style-name="T2">(18/20) </text:span> ⲉⲣⲟϥ ϫⲉ ⲛⲟⲩⲧⲉ ⲉϩⲣⲁⲓ̈ ⲉϫⲱⲟⲩ ⲉϥⲟ <text:line-break/><text:span text:style-name="T1"> </text:span><text:span text:style-name="T2">(18/21) </text:span> ⲛ̅ⲁⲧⲡⲓⲑⲉ ⲉⲧⲉϥϩⲩⲡⲟⲥⲧⲁⲥⲓⲥ ⲛ̅ⲧⲁϥ <text:line-break/><text:span text:style-name="T1"> </text:span><text:span text:style-name="T2">(18/22) </text:span> ϣⲱⲡⲉ ⲉⲃⲟⲗ ⲛ̅ϩⲏⲧ̅ⲥ̅· ⲁⲩⲱ ⲁϥⲛⲟⲩϩ̅ⲃ̅ <text:line-break/><text:span text:style-name="T1"> </text:span><text:span text:style-name="T2">(18/23) </text:span> ⲛ̅ϩⲉⲛⲇⲩⲛⲁⲙⲓⲥ ⲙ̅ⲛ̅ ϩⲉⲛ[ⲉ]ⲝ̣ⲟⲩⲥⲓⲁ <text:line-break/><text:span text:style-name="T1"> </text:span><text:span text:style-name="T2">(18/24) </text:span> ϩ̅ⲙ̅ ⲡⲧⲣⲉϥϫⲟⲟⲥ ⲁⲩϣⲱⲡⲉ ⲁⲩⲱ <text:line-break/><text:span text:style-name="T1"> </text:span><text:span text:style-name="T2">(18/25) </text:span> ⲁϥϯ ⲣⲁⲛ ⲉⲣⲟⲟⲩ ⲁⲩⲱ ⲁϥⲕⲁⲑⲓⲥⲧⲁ <text:line-break/><text:span text:style-name="T1"> </text:span><text:span text:style-name="T2">(19/1) </text:span> (Page nineteen is empty.) <text:line-break/><text:span text:style-name="T1"> </text:span><text:span text:style-name="T2">(20/1) </text:span> (Page twenty is empty. <text:line-break/><text:span text:style-name="T1"> </text:span><text:span text:style-name="T2">(21/1) </text:span> [ⲥⲩⲛⲍⲩⲅⲟⲥ ⲁⲥ]ⲙ̣ⲉ̣ⲧⲁⲛⲟⲉⲓ ⲁⲥⲣⲓⲙⲉ ϩ̅ⲛ̅ <text:line-break/><text:span text:style-name="T1"> </text:span><text:span text:style-name="T2">(21/2) </text:span> [ⲟⲩⲛⲟ]ϭ̣ ⲛⲣⲓⲙⲉ ⲁⲩⲱ ⲁⲩⲥⲱⲧ̅ⲙ̅ ⲉⲡ ⲧⲱⲃϩ <text:line-break/><text:span text:style-name="T1"> </text:span><text:span text:style-name="T2">(21/3) </text:span> [ⲛ̅ⲧⲉⲥⲙ]ⲉ̣[ⲧⲁ]ⲛ̣ⲟⲓⲁ ⲁⲩⲱ ⲁⲩⲡⲁⲣⲁⲕⲁⲗⲉⲓ <text:line-break/><text:span text:style-name="T1"> </text:span><text:span text:style-name="T2">(21/4) </text:span> [ⲉϩⲣⲁ]ⲓ̣ ⲉ̣[ϫ]ⲱ̣ⲥ ⲛ̅ϭⲓ ⲛⲉⲥⲥⲛⲏⲟⲩ ⲁⲩⲱ <text:line-break/><text:span text:style-name="T1"> </text:span><text:span text:style-name="T2">(21/5) </text:span> [ⲁϥ]ⲕⲁⲧⲁⲛⲉⲩⲉ ⲛ̅ϭⲓ ⲡϩⲁⲅⲓⲟⲛ ⲙ̅ⲡ̅ⲛ̅ⲁ̅ <text:line-break/><text:span text:style-name="T1"> </text:span><text:span text:style-name="T2">(21/6) </text:span> [ⲛ̅]ⲁ̣ϩ̣ⲟⲣⲁⲧⲟⲥ ⲁϥⲡⲱϩⲧ· ⲉϩⲣⲁⲓ̈ ⲉϫⲱⲥ <text:line-break/><text:span text:style-name="T1"> </text:span><text:span text:style-name="T2">(21/7) </text:span> [ⲛ̅]ⲟ̣ⲩⲡ̅ⲛ̅ⲁ̅ ⲛ̅ϩⲁⲅⲓⲟⲛ ⲉⲃⲟⲗ ϩ̅ⲙ̅ ⲡⲉⲩ <text:line-break/><text:span text:style-name="T1"> </text:span><text:span text:style-name="T2">(21/8) </text:span> [ⲡ]ⲗ̣ⲏⲣⲱⲙⲁ ⲉⲁ ⲡⲥⲩⲛⲍⲩⲅⲟⲥ ⲉⲓ ⲉⲡⲉ‐ <text:line-break/><text:span text:style-name="T1"> </text:span><text:span text:style-name="T2">(21/9) </text:span> [ⲥⲏⲧ] ⲉⲧⲁϩⲟ ⲛ̅ⲛⲉⲩϣⲱⲱⲧ· ⲉⲣⲁⲧⲟⲩ <text:line-break/><text:span text:style-name="T1"> </text:span><text:span text:style-name="T2">(21/10) </text:span> [ⲁⲩⲱ] ⲁϥϯ ⲛⲁϥ ϩⲓⲧ̅ⲛ̣̅̅ ⲟ̣ⲩⲡⲣⲟⲛⲟⲓⲁ ⲉⲧⲁ‐ <text:line-break/><text:span text:style-name="T1"> </text:span><text:span text:style-name="T2">(21/11) </text:span> [ϩⲟ ⲛ̅]ⲛ̣ⲉⲥϣⲱⲱⲧ [ⲉ]ⲣⲁⲧⲟⲩ· ⲁⲩⲱ ⲁⲩⲉⲓ‐ <text:line-break/><text:span text:style-name="T1"> </text:span><text:span text:style-name="T2">(21/12) </text:span> [ⲛⲉ ⲙ̅]ⲙ̣ⲟ̣[ⲥ ⲉϩⲣⲁⲓ̈] ⲉ̣ⲡⲉⲥⲁⲓⲱⲛ ⲁⲛ ⲁⲗ‐ <text:line-break/><text:span text:style-name="T1"> </text:span><text:span text:style-name="T2">(21/13) </text:span> [ⲗⲁ ⲉⲧⲃⲉ ⲧⲙ̅ⲛ̅ⲧ̅ⲁⲧⲥⲟⲟⲩⲛ ⲛ̅]ⲧⲁⲥⲟⲩ‐ <text:line-break/><text:span text:style-name="T1"> </text:span><text:span text:style-name="T2">(21/14) </text:span> [ⲱⲛϩ ⲉⲃⲟⲗ ⲛ̅ϩⲏⲧ̅ⲥ̅ ⲉⲥϣⲟⲟⲡ] ϩ̣̅ⲛ̅ ⲧⲙⲁϩⲯⲓ‐ <text:line-break/><text:span text:style-name="T1"> </text:span><text:span text:style-name="T2">(21/15) </text:span> [ⲧⲉ ϣⲁⲛⲧ̅ⲥ̅ⲧⲁϩⲟ ⲙ̅ⲡ]ⲉ̣ⲥϣⲱⲱⲧ ⲉ‐ <text:line-break/><text:span text:style-name="T1"> </text:span><text:span text:style-name="T2">(21/16) </text:span> [ⲣⲁⲧ̅ϥ̅ ⲁⲩⲱ ⲁⲩⲥⲙⲏ] ϣⲱⲡⲉ ϣⲁⲣⲟⲥ <text:line-break/><text:span text:style-name="T1"> </text:span><text:span text:style-name="T2">(21/17) </text:span> [ϫⲉ ϥϣⲟⲟⲡ ⲛ̅ϭⲓ ⲡⲣ]ⲱ̣ⲙⲉ ⲁⲩⲱ ⲡϣⲏ‐ <text:line-break/><text:soft-page-break/><text:span text:style-name="T1"> </text:span><text:span text:style-name="T2">(21/18) </text:span> [ⲣⲉ ⲙ̅ⲡⲣⲱⲙⲉ ⲁϥⲥⲱⲧ]ⲙ̣ ⲇⲉ ⲛ̅ϭⲓ ⲡⲉ‐ <text:line-break/><text:span text:style-name="T1"> </text:span><text:span text:style-name="T2">(21/19) </text:span> [ϩⲟⲩⲉⲓⲧ ⲛ̅ⲁⲣⲭⲱⲛ ⲓ̈ⲁ]ⲗⲇⲁⲃⲁⲱⲑ· ⲛⲉϥ‐ <text:line-break/><text:span text:style-name="T1"> </text:span><text:span text:style-name="T2">(21/20) </text:span> [ⲙⲉⲉⲩⲉ ϫⲉ ⲛ̅]ⲧⲁ ⲧⲉⲥⲙⲏ ⲉⲓ ⲉ‐ <text:line-break/><text:span text:style-name="T1"> </text:span><text:span text:style-name="T2">(21/21) </text:span> [ⲃⲟⲗ ϩⲓⲧ̅ⲛ̅ ⲧⲉϥⲙⲁⲁⲩ ⲁ]ϥ̣ⲟ̣ⲩ̣ⲱⲛϩ ⲛⲁⲩ <text:line-break/><text:span text:style-name="T1"> </text:span><text:span text:style-name="T2">(21/22) </text:span> [ⲉⲃⲟⲗ ⲛ̅ϭⲓ ⲡⲉⲓⲱⲧ ⲉⲧⲟⲩⲁⲁⲃ ⲛ̅ⲧ]ⲉ ⲗⲓⲟⲥ ⲛ̅‐ <text:line-break/><text:span text:style-name="T1"> </text:span><text:span text:style-name="T2">(21/23) </text:span> [ϩⲟⲩⲉⲓⲧ ⲛ̅ⲣⲱⲙⲉ ⲁ]ⲡ̣ⲙⲁⲕⲁⲣⲓⲟⲥ <text:line-break/><text:span text:style-name="T1"> </text:span><text:span text:style-name="T2">(21/24) </text:span> [ⲟⲩⲱⲛ]ϩ̣ ⲛⲁⲩ ⲉⲃⲟⲗ ⲛ̅ⲧⲉϥϩⲓⲇⲉⲁ· <text:line-break/><text:span text:style-name="T1"> </text:span><text:span text:style-name="T2">(22/1) </text:span> ⲁⲩⲱ ⲁⲩⲕⲁⲧⲁⲛⲉⲩⲉ [ⲛ̅ϭⲓ ⲧⲁⲣⲭⲟⲛⲧⲓ]‐ <text:line-break/><text:span text:style-name="T1"> </text:span><text:span text:style-name="T2">(22/2) </text:span> ⲕⲏ ⲧⲏⲣⲥ ⲛ̅ⲉⲝⲟⲩⲥⲓⲁ ⲁⲩⲱ ⲁⲩ[ⲛⲁⲩ ϩ̅ⲙ̅ ⲡⲙⲟ]‐ <text:line-break/><text:span text:style-name="T1"> </text:span><text:span text:style-name="T2">(22/3) </text:span> ⲟⲩ ⲉⲡⲧⲩⲡⲟⲥ ⲛ̅ⲧϩⲓⲕⲱ[ⲛ] ⲡ̣[ⲉϫⲁⲩ ϫ]‐ <text:line-break/><text:span text:style-name="T1"> </text:span><text:span text:style-name="T2">(22/4) </text:span> ⲉ ϩ̅ⲛ̅ ⲛⲉⲩⲉⲣⲏⲟⲩ ϫⲉ ⲙⲁ̣[ⲣ̅ⲛ̅ⲧⲁⲙ]ⲓ[ⲟ ⲛ̅ⲟⲩⲣⲱ]‐ <text:line-break/><text:span text:style-name="T1"> </text:span><text:span text:style-name="T2">(22/5) </text:span> ⲙⲉ ⲕⲁⲧⲁ ⲑⲓⲕⲱⲛ ⲙ̅ⲡⲛⲟⲩⲧⲉ ⲁⲩ̣[ⲱ] <text:line-break/><text:span text:style-name="T1"> </text:span><text:span text:style-name="T2">(22/6) </text:span> ⲕⲁⲧⲁ ⲡⲉϥⲉⲓⲛⲉ ⲁⲩⲱ ⲁⲩⲧⲁⲙⲓ̈ⲟ ⲉ̣[ⲃⲟⲗ] <text:line-break/><text:span text:style-name="T1"> </text:span><text:span text:style-name="T2">(22/7) </text:span> ⲛ̅ϩⲏⲧⲟⲩ ⲙ̅ⲛ̅ ⲛⲉⲩⲇⲩⲛⲁⲙⲓⲥ ⲧⲏ[ⲣⲟⲩ] <text:line-break/><text:span text:style-name="T1"> </text:span><text:span text:style-name="T2">(22/8) </text:span> ⲁⲩⲡⲗⲁⲥⲥⲉ ⲛ̅ⲟⲩⲡⲗⲁⲥⲙⲁ ⲉⲃⲟⲗ ⲛ̅[ϩⲏ]‐ <text:line-break/><text:span text:style-name="T1"> </text:span><text:span text:style-name="T2">(22/9) </text:span> ⲧⲟⲩ ⲁⲩⲱ ⲧⲟⲩⲉⲓ ⲧⲟⲩⲉⲓ ⲛ̅ⲛ̅ⲇⲩⲛ[ⲁⲙⲓⲥ] <text:line-break/><text:span text:style-name="T1"> </text:span><text:span text:style-name="T2">(22/10) </text:span> ⲁⲥⲧⲁⲙⲓⲟ ⲉⲃⲟⲗ ϩ̅ⲛ̅ ⲧⲉⲥϭⲟⲙ ⲛ̅ⲟ̣[ⲩⲯⲩ]‐ <text:line-break/><text:span text:style-name="T1"> </text:span><text:span text:style-name="T2">(22/11) </text:span> ⲭⲏ· ⲁⲥⲧⲁⲙⲓⲟ [ⲉ]ⲃ̣ⲟⲗ ϩ̅ⲛ̅ ⲧⲉⲥϩⲓⲕ[ⲱⲛ] <text:line-break/><text:span text:style-name="T1"> </text:span><text:span text:style-name="T2">(22/12) </text:span> ⲙ̅ⲙⲓⲛ ⲙ̅ⲙⲟⲥ ⲧⲁⲓ̣̈ ⲛ̣̅ⲧ̣ⲁⲥⲛⲁ̣ⲩ̣ [ⲉⲣⲟⲥ] <text:line-break/><text:span text:style-name="T1"> </text:span><text:span text:style-name="T2">(22/13) </text:span> ⲕⲁⲧⲁ ⲧ[ⲙⲓ]ⲙ̣ⲏ̣ⲥ̣[ⲓⲥ ⲙ̅ⲡⲉⲧϣⲟⲟⲡ ϫⲓⲛ] <text:line-break/><text:span text:style-name="T1"> </text:span><text:span text:style-name="T2">(22/14) </text:span> ⲛ̅ϣⲟⲣ̣ⲡ̣ ⲡ̣[ⲓⲧⲉⲗⲓⲟⲥ ⲛ̅ⲣⲱⲙⲉ ⲁⲩⲱ] <text:line-break/><text:span text:style-name="T1"> </text:span><text:span text:style-name="T2">(22/15) </text:span> ⲡⲉϫⲁⲩ ϫⲉ [ⲙⲁⲣ̅ⲛ̅ϯ ⲣ̅ⲛϥ̅ ϫⲉ ⲁⲇⲁⲙ] <text:line-break/><text:span text:style-name="T1"> </text:span><text:span text:style-name="T2">(22/16) </text:span> ϫⲉⲕⲁⲁⲥ ⲡⲣ̣[ⲁⲛ ⲙⲡⲏ ⲙ̅ⲛ̅] <text:line-break/><text:span text:style-name="T1"> </text:span><text:span text:style-name="T2">(22/17) </text:span> ⲧⲉϥⲇⲩⲛⲁ[ⲙⲓⲥ ⲉⲩⲉϣⲱⲡⲉ ⲛⲁⲛ] <text:line-break/><text:span text:style-name="T1"> </text:span><text:span text:style-name="T2">(22/18) </text:span> ⲛ̅ⲟⲩⲟⲉⲓⲛ [ⲁⲩⲱ ⲁⲩⲁⲣⲭⲉⲥⲑⲁⲓ ϫⲓⲛ] <text:line-break/><text:span text:style-name="T1"> </text:span><text:span text:style-name="T2">(22/19) </text:span> ⲙ̅ⲡⲉⲥⲏⲧ· [ⲛ̅ϭⲓ ⲛ̅ϭⲟⲙ ⲧϣⲟⲣⲡ ⲧⲙ̅ⲛ̅ⲧ̅ ⲛⲟⲩ] <text:line-break/><text:span text:style-name="T1"> </text:span><text:span text:style-name="T2">(22/20) </text:span> ⲧⲉ ⲟⲩⲕⲁⲥ [ⲙ̅ⲯⲩⲭⲏ ⲧⲙⲉϩⲥ̅ⲛ̅ⲧⲉ] <text:line-break/><text:span text:style-name="T1"> </text:span><text:span text:style-name="T2">(22/21) </text:span> ⲧⲉ ⲧⲙ̅ⲛ̅ⲧ̅ϫ[ⲟⲉⲓⲥ ⲟⲩⲙⲟⲩⲧ ⲙ̅ⲯⲩ]‐ <text:line-break/><text:span text:style-name="T1"> </text:span><text:span text:style-name="T2">(22/22) </text:span> ⲭⲏ ⲙ̅[ ⲧⲙⲉϩϣⲟⲙⲧⲉ ⲧⲉ ⲡⲕⲁⲩ]‐ <text:line-break/><text:span text:style-name="T1"> </text:span><text:span text:style-name="T2">(22/23) </text:span> ⲙⲁ· ⲧ̣[ ⲟⲩⲥⲁⲣⲕⲓ]‐ <text:line-break/><text:span text:style-name="T1"> </text:span><text:span text:style-name="T2">(22/24) </text:span> ⲕⲏ ⲛ̅ⲯ̣[ⲩⲭⲏ ⲙ̅ⲛ̅ ⲡⲕⲱ ⲉϩⲣⲁⲓ̈ ⲧⲏⲣϥ̅] <text:line-break/><text:span text:style-name="T1"> </text:span><text:span text:style-name="T2">(23/1) </text:span> [ⲙ̅ⲡⲥ]ⲱ̣ⲙ̣[ⲁ] ⲧ̣ⲙⲉϩϥⲧⲟⲉ ⲧⲉⲡⲣⲟⲛⲟⲓ <text:line-break/><text:span text:style-name="T1"> </text:span><text:span text:style-name="T2">(23/2) </text:span> [ⲁ ⲧⲉ ⲟⲩⲁⲧⲕ]ⲁⲥ ⲛ̅ⲯⲩⲭⲏ· ⲧⲙⲉϩϯⲉ ⲧⲙ̅ⲛ̅ⲧ̅ⲣ̅‐ <text:line-break/><text:span text:style-name="T1"> </text:span><text:span text:style-name="T2">(23/3) </text:span> [ⲣⲟ ⲧⲉ ⲟⲩⲥⲛ]ⲟ̣[ϥ] ⲙ̅ⲯⲩⲭⲏ ⲧⲙⲉϩⲥⲟ ⲧⲉ <text:line-break/><text:span text:style-name="T1"> </text:span><text:span text:style-name="T2">(23/4) </text:span> [ⲧⲥⲩ]ⲛ̣ϩ̣ⲉ̣ⲥ̣ⲓⲥ ⲟⲩϣⲁⲗ ⲙ̅ⲯⲩⲭⲏ ⲙ̅ⲛ̅ <text:line-break/><text:span text:style-name="T1"> </text:span><text:span text:style-name="T2">(23/5) </text:span> [ⲡⲥ]ⲱⲙⲁ ⲧⲏⲣϥ· ⲧⲙⲉϩⲥⲁϣϥⲉ ⲧⲉ ⲧⲥⲟ‐ <text:line-break/><text:span text:style-name="T1"> </text:span><text:span text:style-name="T2">(23/6) </text:span> [ⲫⲓⲁ] ⲟⲩϥⲱⲉ ⲙ̅ⲯⲩⲭⲏ· ⲁⲩⲱ ⲁⲩⲕⲟⲥⲙⲉⲓ <text:line-break/><text:span text:style-name="T1"> </text:span><text:span text:style-name="T2">(23/7) </text:span> [ⲙ̅ⲡ]ⲣⲱⲙⲉ· ⲧⲏⲣ̅ϥ̅· ⲁⲩⲱ ⲁⲩⲁϩⲉ ⲉⲣⲁ ⲧⲟⲩ <text:line-break/><text:span text:style-name="T1"> </text:span><text:span text:style-name="T2">(23/8) </text:span> [ϩⲓϫⲱⲟ]ⲩ ⲛ̅ϭⲓ ⲛⲉⲩⲁⲅ·ⲅⲉⲗⲟⲥ ⲁⲩⲧⲁⲙⲓⲟ <text:line-break/><text:span text:style-name="T1"> </text:span><text:span text:style-name="T2">(23/9) </text:span> [ⲉⲃⲟⲗ] ϩ̅ⲛ̅ ⲛⲉⲯⲩⲭⲏ ⲛ̅ⲧⲁⲩⲥ̅ⲃ̅ⲧⲱⲧⲟⲩ <text:line-break/><text:span text:style-name="T1"> </text:span><text:span text:style-name="T2">(23/10) </text:span> [ⲛ̅ϭⲓ ⲛⲓ]ⲉⲝⲟⲩⲥⲓⲁ ⲛ̅ⲧ[ϩⲩ]ⲡⲟⲥⲧⲁⲥⲓⲥ ⲙ̅‐ <text:line-break/><text:span text:style-name="T1"> </text:span><text:span text:style-name="T2">(23/11) </text:span> [ⲯⲩⲭⲟⲟⲩ]ⲉ ⲛ̅ⲛ̅ⲙ̅ⲙ[ⲉⲗ]ⲟ̣ⲥ̣ ⲙ̣̅ⲛ̣̅ ⲛ̣̅[ϩ]ⲟⲣ ⲙⲟⲥ <text:line-break/><text:span text:style-name="T1"> </text:span><text:span text:style-name="T2">(23/12) </text:span> [ⲁⲩⲧⲁⲙⲓⲟ ⲙ̅ⲡⲥⲱⲙⲁ ⲧⲏⲣ̅ϥ̅] ⲉϥϩⲟⲣⲙⲁ‐ <text:line-break/><text:span text:style-name="T1"> </text:span><text:span text:style-name="T2">(23/13) </text:span> [ⲍⲉ ⲉⲃⲟⲗ ϩ̅ⲙ̅ ⲡⲙⲏⲏϣⲉ] ⲛ̣̅ⲁ̣ⲅ·ⲅⲉ‐ <text:line-break/><text:span text:style-name="T1"> </text:span><text:span text:style-name="T2">(23/14) </text:span> [ⲗⲟⲥ ⲛ̅ⲧⲁⲓϫⲟⲟ]ⲩ̣ ⲛ̣ϣⲟⲣⲡ· ⲁⲩⲱ ⲁϥ‐ <text:line-break/><text:span text:style-name="T1"> </text:span><text:span text:style-name="T2">(23/15) </text:span> [ϭⲱ ⲉϥϩⲩⲡ]ⲟⲗⲩⲉ ⲛ̅ⲟⲩⲛⲟϭ ⲛⲭⲣⲟⲛⲟⲥ <text:line-break/><text:span text:style-name="T1"> </text:span><text:span text:style-name="T2">(23/16) </text:span> [ⲭⲉ ⲙ̅ⲡⲟ]ⲩ̣ϣϭⲙϭⲟⲙ ⲛ̅ϭⲓ ⲧⲥⲁϣϥⲉ ⲛ̅‐ <text:line-break/><text:soft-page-break/><text:span text:style-name="T1"> </text:span><text:span text:style-name="T2">(23/17) </text:span> [ⲉⲝⲟⲩⲥ]ⲓ̣ⲁ ⲉⲧⲟⲩⲛⲟⲥϥ ⲟⲩⲇⲉ ⲡⲕⲉ <text:line-break/><text:span text:style-name="T1"> </text:span><text:span text:style-name="T2">(23/18) </text:span> [ϣ̅ⲙ̅ⲧ̅]ϣ̣ⲉⲥⲉ· ⲛ̅ⲁⲅ·ⲅⲉⲗⲟⲥ ⲛⲉⲣⲥⲙ̅‐ <text:line-break/><text:span text:style-name="T1"> </text:span><text:span text:style-name="T2">(23/19) </text:span> [ⲛⲉ] ⲛ̣ⲛ̅ϩⲟⲣⲙⲟⲥ ⲁⲥⲣ̅ϩⲛⲁⲥ ϭⲉ ⲛ̅ϭⲓ <text:line-break/><text:span text:style-name="T1"> </text:span><text:span text:style-name="T2">(23/20) </text:span> [ⲧⲙⲁ]ⲁ̣ⲩ̣ ⲉⲧⲱⲕⲉ ⲛ̅ⲧⲇⲩⲛⲁⲙⲓⲥ ⲛ̅ⲧⲁⲥ <text:line-break/><text:span text:style-name="T1"> </text:span><text:span text:style-name="T2">(23/21) </text:span> [ⲧⲁⲁⲥ ⲙ̅]ⲡⲁⲣⲭⲱⲛ ϩ̅ⲛ̅ ⲟⲩⲡⲣⲟⲩⲛⲓⲕⲟ̅ <text:line-break/><text:span text:style-name="T1"> </text:span><text:span text:style-name="T2">(23/22) </text:span> [ⲉⲥⲟ ⲛ̅]ⲃⲁⲗϩⲏⲧ· ⲁⲥⲧⲱⲃϩ ⲙ̅ⲡⲓⲱⲧ· <text:line-break/><text:span text:style-name="T1"> </text:span><text:span text:style-name="T2">(23/23) </text:span> [ⲉⲧⲉ] ⲛⲁ̣ϣⲉ ⲡⲉϥⲛⲁⲉ ⲙ̅ⲛ ⲡϯⲟⲩ ⲛ̅ⲟⲩ‐ <text:line-break/><text:span text:style-name="T1"> </text:span><text:span text:style-name="T2">(24/1) </text:span> ⲟⲉⲓⲛ ⲁϥⲧ̅ⲛ̅ⲛⲟⲟⲩ ϩ̅ⲛ̣̅ [ⲟ]ⲩ̣ϣ[ⲁϫⲛⲉ] <text:line-break/><text:span text:style-name="T1"> </text:span><text:span text:style-name="T2">(24/2) </text:span> ⲉϥⲟⲩⲁⲁⲃ ⲙ̅ⲛ̅ ⲡⲉϥϥⲧⲟⲟⲩ ⲛ̣̅[ⲟⲩⲟ]‐ <text:line-break/><text:span text:style-name="T1"> </text:span><text:span text:style-name="T2">(24/3) </text:span> ⲉⲓⲛ ⲙ̅ⲡⲧⲩⲡⲟⲥ ⲛ̅ⲛ̅ⲁⲅ̣ⲅⲉ[ⲗⲟⲥ ⲙ̅]‐ <text:line-break/><text:span text:style-name="T1"> </text:span><text:span text:style-name="T2">(24/4) </text:span> ⲡⲉⲡⲣⲱⲧⲁⲣⲭⲱⲛ ⲁⲩ[ⲱ ⲁⲩϯ ϣⲟ]‐ <text:line-break/><text:span text:style-name="T1"> </text:span><text:span text:style-name="T2">(24/5) </text:span> ϫⲛⲉ ⲛⲁϥ ⲡⲉ ϩⲱⲥⲧⲉ ⲛ̅ⲥⲉⲧⲱⲕ[ⲉ ⲛ̅]‐ <text:line-break/><text:span text:style-name="T1"> </text:span><text:span text:style-name="T2">(24/6) </text:span> ⲧⲇⲩⲛⲁⲙⲓⲥ ⲛ̅ⲧⲙⲁⲁⲩ ⲛ̅ⲧⲟⲟⲧ̅ϥ̅· ⲁ̣[ⲩ]‐ <text:line-break/><text:span text:style-name="T1"> </text:span><text:span text:style-name="T2">(24/7) </text:span> ⲱ ⲡⲉϫⲁⲩ ⲛⲁϥ ϫⲉ ⲛⲓϥⲉ ⲉϩⲟⲩⲛ [ϩ̅ⲙ̅] <text:line-break/><text:span text:style-name="T1"> </text:span><text:span text:style-name="T2">(24/8) </text:span> ⲡⲉϥϩⲟ ⲙ̅ⲡⲉⲕⲡ̅ⲛ̅ⲁ̅· ⲁⲩⲱ ⲡϩⲱ[ⲃ] <text:line-break/><text:span text:style-name="T1"> </text:span><text:span text:style-name="T2">(24/9) </text:span> ⲛⲁⲧⲱⲟⲩⲛϥ· ⲁⲩⲱ ⲁϥⲛⲓϥⲉ ⲉϩ[ⲟⲩⲛ] <text:line-break/><text:span text:style-name="T1"> </text:span><text:span text:style-name="T2">(24/10) </text:span> ⲉϩⲣⲁϥ ⲛ̅ⲟⲩⲡ̅ⲛ̅ⲁ̅· ⲉⲧⲉ ⲧⲇⲩⲛⲁ̣[ⲙⲓⲥ] <text:line-break/><text:span text:style-name="T1"> </text:span><text:span text:style-name="T2">(24/11) </text:span> ⲛ̅ⲧⲙⲁⲁⲩ ⲧⲉ· ⲉ̣ⲃ̣ⲟⲗ ϩ̅ⲙ̅ ⲡⲉϩⲟⲩⲉ[ⲓⲧ ⲛ̅]‐ <text:line-break/><text:span text:style-name="T1"> </text:span><text:span text:style-name="T2">(24/12) </text:span> ⲁⲣⲭⲱⲛ ⲉϩ̣ⲟⲩ̣[ⲛ] ⲉⲡⲥⲱⲙⲁ [ⲁⲩⲱ ⲁϥ]‐ <text:line-break/><text:span text:style-name="T1"> </text:span><text:span text:style-name="T2">(24/13) </text:span> ⲕⲓⲙ ϩ̣[ⲛ̅ ⲧⲉⲩⲛⲟⲩ ⲁⲩⲱ ⲁϥ]ϭ̣ⲙ̣[ϭⲟⲙ] <text:line-break/><text:span text:style-name="T1"> </text:span><text:span text:style-name="T2">(24/14) </text:span> ⲉⲣⲟϥ [ⲁⲩⲱ ⲁⲩⲕⲱϩ ⲛ̅ϭⲓ ⲡⲕⲉⲥⲉⲉⲡⲉ] <text:line-break/><text:span text:style-name="T1"> </text:span><text:span text:style-name="T2">(24/15) </text:span> ⲛ̅ⲛⲉⲝⲟⲩ̣[ⲥⲓⲁ ϫⲉ ⲁϥϣⲱⲡⲉ ⲅⲁⲣ ⲉ]‐ <text:line-break/><text:span text:style-name="T1"> </text:span><text:span text:style-name="T2">(24/16) </text:span> ⲃⲟⲗ ⲛ̅ϩⲏⲧⲟⲩ ⲧⲏⲣ̣ⲟ̣ⲩ̣ [ⲁⲩⲱ ⲁⲩϯ ⲙ̅]‐ <text:line-break/><text:span text:style-name="T1"> </text:span><text:span text:style-name="T2">(24/17) </text:span> ⲡⲣⲱⲙⲉ ⲛ̅ⲛⲉⲩⲇⲩⲛⲁⲙⲓ[ⲥ] ⲁⲩⲱ ⲁϥⲫⲟⲣⲓ <text:line-break/><text:span text:style-name="T1"> </text:span><text:span text:style-name="T2">(24/18) </text:span> ⲛ̅ⲛⲉⲩⲯⲩⲭⲟ[ⲟⲩⲉ ⲛⲁ ⲛ̅]ⲧⲥⲁϣϥⲉ ⲛ̅ⲉ‐ <text:line-break/><text:span text:style-name="T1"> </text:span><text:span text:style-name="T2">(24/19) </text:span> ⲝⲟⲩⲥⲓⲁ ⲁⲩⲱ ⲙ̅ⲛ̅ [ⲛⲉⲩ]ⲇⲩⲛⲁⲙⲓⲥ [ⲁ ⲡⲉϥ]‐ <text:line-break/><text:span text:style-name="T1"> </text:span><text:span text:style-name="T2">(24/20) </text:span> ⲙⲉⲉⲩⲉ ϭⲙϭⲟⲙ· ⲛ̅ϩⲟⲩⲟ ⲉ̣[ⲛⲉⲛⲧⲁⲩ] <text:line-break/><text:span text:style-name="T1"> </text:span><text:span text:style-name="T2">(24/21) </text:span> ⲧⲁⲙⲓⲟϥ ⲁⲩⲱ ⲙ̅ⲛ̅ ⲡⲉϩⲟ̣[ⲩⲉⲓⲧ ⲛ̅]‐ <text:line-break/><text:span text:style-name="T1"> </text:span><text:span text:style-name="T2">(24/22) </text:span> ⲁⲣⲭⲱⲛ ⲁⲩⲉⲓⲙⲉ ⲇⲉ ϫⲉ ϥⲕⲏ̣[ⲕ ⲁϩⲏⲩ] <text:line-break/><text:span text:style-name="T1"> </text:span><text:span text:style-name="T2">(24/23) </text:span> ⲉⲃⲟⲗ ⲛ̅ⲧⲕⲁⲕⲓⲁ ϫⲉ ⲛⲉϥⲟ ⲛ̅[ⲥⲁⲃⲉ ⲛ̅]‐ <text:line-break/><text:span text:style-name="T1"> </text:span><text:span text:style-name="T2">(24/24) </text:span> ϩⲟⲩⲟ ⲉⲣⲟⲟⲩ ⲡⲉ ⲁⲩⲱ ϫⲉ ⲁϥ̣[ⲉⲓ ⲉϩⲟⲩⲛ] <text:line-break/><text:span text:style-name="T1"> </text:span><text:span text:style-name="T2">(24/25) </text:span> ⲉⲡⲟⲩⲟⲉⲓⲛ ⲁⲩϥⲓ ⲙ̅ⲙⲟϥ̣ [ⲁⲩⲉⲓⲛⲉ] <text:line-break/><text:span text:style-name="T1"> </text:span><text:span text:style-name="T2">(24/26) </text:span> ⲙ̅ⲙⲟϥ ⲉⲡⲉⲥⲏⲧ· ⲉⲧϩⲩⲗ̣[ⲏ ⲧⲏⲣ̅ⲥ̅ <text:line-break/><text:span text:style-name="T1"> </text:span><text:span text:style-name="T2">(24/27) </text:span> ⲡⲙⲁⲕⲁⲣⲓⲟⲥ ⲛ̅ⲉⲓⲱⲧ· ⲉⲩⲣ̣ⲉ̣ϥ̣[ⲣ̅ⲡⲡⲉⲧ] <text:line-break/><text:span text:style-name="T1"> </text:span><text:span text:style-name="T2">(25/1) </text:span> [ⲛⲁⲛ]ⲟ̣ⲩ̣ϥ̣ [ⲡ]ⲉ ⲁⲩⲱ ⲛ̅ϣⲁⲛϩⲧⲏϥ <text:line-break/><text:span text:style-name="T1"> </text:span><text:span text:style-name="T2">(25/2) </text:span> [ⲁϥϣ̅ⲛ̅]ϩⲧⲏϥ ⲉϩⲣⲁⲓ̈ ⲉϫ̅ⲛ̅ ⲧⲇⲩⲛⲁⲙⲓⲥ <text:line-break/><text:span text:style-name="T1"> </text:span><text:span text:style-name="T2">(25/3) </text:span> [ⲛ̅ⲧⲙⲁⲁⲩ ⲧ]ⲁⲓ̈ ⲛ̅ⲧⲁⲩⲉⲓⲛⲉ ⲙ̅ⲙⲟⲥ <text:line-break/><text:span text:style-name="T1"> </text:span><text:span text:style-name="T2">(25/4) </text:span> [ⲉⲃⲟⲗ] ⲛ̣̅ⲧ̣ⲟⲟⲧ̅ϥ̅ ⲙ̅ⲡⲁⲣⲭⲱⲛ ⲁⲩⲱ <text:line-break/><text:span text:style-name="T1"> </text:span><text:span text:style-name="T2">(25/5) </text:span> [ϫⲉ ⲥⲉⲟ ⲛ̅]ϫⲟⲉⲓⲥ ⲉϩⲣⲁⲓ̈ ⲉϫ̅ⲙ̅ ⲡⲥⲱⲙⲁ <text:line-break/><text:span text:style-name="T1"> </text:span><text:span text:style-name="T2">(25/6) </text:span> [ⲁϥⲧ]ⲛⲛⲟⲟⲩ ⲉⲃⲟⲗ ⲙ̅ⲡⲉϥⲡ̅ⲛ̅ⲁ̅ ⲛ̅‐ <text:line-break/><text:span text:style-name="T1"> </text:span><text:span text:style-name="T2">(25/7) </text:span> [ⲣⲉϥⲣ̅]ⲡ̣ⲉⲧⲛⲁⲛⲟⲩϥ ⲁⲩⲱ ⲉⲛⲁϣⲉ <text:line-break/><text:span text:style-name="T1"> </text:span><text:span text:style-name="T2">(25/8) </text:span> [ⲡⲉϥⲛ]ⲁ̣ⲉ ⲛ̅ⲟⲩⲃⲟⲏⲑⲟⲥ ⲙ̅ⲡⲉϩⲟⲩ <text:line-break/><text:span text:style-name="T1"> </text:span><text:span text:style-name="T2">(25/9) </text:span> [ⲉⲓⲧ ⲛ̅ⲧⲁ]ϥ̣ⲉⲓ ⲉⲡⲉⲥⲏⲧ· ⲁⲩϯ ⲣⲛ̅ϥ̅ ϫⲉ <text:line-break/><text:span text:style-name="T1"> </text:span><text:span text:style-name="T2">(25/10) </text:span> [ⲁⲇⲁⲙ ⲛ̅]ⲧ̣ⲉⲡⲓⲛⲟⲓⲁ ⲙ̅ⲡ̣ⲟⲩⲟⲉⲓⲛ ⲧⲁⲓ̈ <text:line-break/><text:span text:style-name="T1"> </text:span><text:span text:style-name="T2">(25/11) </text:span> [ⲛ̅ⲧⲁϥϯ] ⲣ̣ⲛ̅ⲥ ⲉⲃⲟⲗ ϩⲓ[ⲧ]ⲟ̣ⲟⲧ̅ϥ̅ ϫⲉ ⲍ̣ⲱ̣ⲏ <text:line-break/><text:span text:style-name="T1"> </text:span><text:span text:style-name="T2">(25/12) </text:span> [ⲛ̅ⲧⲟⲥ ⲇⲉ ⲉⲧ̅ⲣ̅ϩⲱⲃ ⲉⲡⲥⲱⲛⲧ] ⲧⲏⲣϥ ⲉ̣ⲥ̣‐ <text:line-break/><text:span text:style-name="T1"> </text:span><text:span text:style-name="T2">(25/13) </text:span> [ϣⲉⲡ ϩⲓⲥⲉ ⲛ̅ⲙ̅ⲙⲁϥ ⲉⲥⲧⲁϩⲟ]ϥ̣ ⲉ̣ⲣⲁⲧ̅ϥ̅ <text:line-break/><text:soft-page-break/><text:span text:style-name="T1"> </text:span><text:span text:style-name="T2">(25/14) </text:span> [ⲉϩⲟⲩⲛ ⲉⲡⲉϥⲡⲗ]ⲏ̣ⲣ̣ⲱⲙⲁ· ⲉⲥⲧⲟⲩⲛⲉⲓ <text:line-break/><text:span text:style-name="T1"> </text:span><text:span text:style-name="T2">(25/15) </text:span> [ⲁⲧ]ϥ ⲉⲃⲟⲗ ⲉⲧϭⲉⲓ ⲛⲉⲓ ⲉⲡⲉⲥⲏⲧ <text:line-break/><text:span text:style-name="T1"> </text:span><text:span text:style-name="T2">(25/16) </text:span> [ⲙ̅ⲡϩⲩ]ⲥⲧⲉⲣⲏⲙⲁ· ⲛ̅ⲥ̅ⲥⲧⲁⲃⲟϥ ⲉⲡⲉϥ <text:line-break/><text:span text:style-name="T1"> </text:span><text:span text:style-name="T2">(25/17) </text:span> [ⲱⲗ ⲉϩⲣⲁⲓ̈]· ⲁⲥϣⲱⲡⲉ ϭⲉ ⲛ̅ϭⲓ ⲧⲉⲡⲓ ⲛⲟⲓⲁ <text:line-break/><text:span text:style-name="T1"> </text:span><text:span text:style-name="T2">(25/18) </text:span> [ⲙ̅ⲡⲟⲩⲟ]ⲉⲓⲛ ⲉⲥϩⲏⲡ· ⲛ̅ϩⲣⲁⲓ̈ ⲛ̅ϩⲏⲧ̅ϥ̅ <text:line-break/><text:span text:style-name="T1"> </text:span><text:span text:style-name="T2">(25/19) </text:span> [ϫⲉⲕⲁ]ⲁ̣ⲥ ⲛ̅ⲛⲉⲩⲉⲓⲙⲉ ⲛ̅ϭⲓ ⲛⲁⲣⲭⲱⲛ <text:line-break/><text:span text:style-name="T1"> </text:span><text:span text:style-name="T2">(25/20) </text:span> [ⲁⲗⲗⲁ] ϫⲉ ⲉⲣⲉ ⲧⲉⲛϣⲃ̅ⲣ̅ⲥⲱⲛⲉ ⲉⲧⲉⲓ <text:line-break/><text:span text:style-name="T1"> </text:span><text:span text:style-name="T2">(25/21) </text:span> [ ]ⲛ̣ ⲧⲥⲟⲫⲓⲁ ⲉⲥⲛⲁⲧⲁϩⲟ ⲉⲣⲁ‐ <text:line-break/><text:span text:style-name="T1"> </text:span><text:span text:style-name="T2">(25/22) </text:span> [ⲧ̅ⲥ̅ ⲛ̅ⲛ]ⲉⲥϩⲩⲥⲧⲉⲣⲏⲙⲁ ⲉⲃⲟⲗ ϩⲓⲧⲟ‐ <text:line-break/><text:span text:style-name="T1"> </text:span><text:span text:style-name="T2">(25/23) </text:span> [ⲟⲧ̅ⲥ̅] ⲛ̣ⲧ̣ⲉⲡⲓⲛⲟⲓⲁ ⲙ̅ⲡⲟⲩⲟⲉⲓⲛ ⲁⲩⲱ <text:line-break/><text:span text:style-name="T1"> </text:span><text:span text:style-name="T2">(26/1) </text:span> ⲁϥ̣ⲣ̅ⲟⲩⲟⲉⲓⲛ ⲛ̅ϭⲓ ⲡⲣ[ⲱⲙ]ⲉ̣ [ⲉⲧⲃⲉ ⲑⲁⲓⲃⲉⲥ] <text:line-break/><text:span text:style-name="T1"> </text:span><text:span text:style-name="T2">(26/2) </text:span> ⲛ̅ⲡⲟⲩⲟⲉⲓⲛ ⲉⲧⲛ̅ϩⲏⲧ̅ϥ̅· ⲁⲩⲱ ⲁϥ̣[ϫⲓⲥⲉ] <text:line-break/><text:span text:style-name="T1"> </text:span><text:span text:style-name="T2">(26/3) </text:span> ⲛ̅ϩⲟⲩⲟ ⲉⲛⲉⲛⲧⲁⲩⲧⲁⲙ̣[ⲓⲟϥ ⲁⲩⲱ ⲁⲥ]‐ <text:line-break/><text:span text:style-name="T1"> </text:span><text:span text:style-name="T2">(26/4) </text:span> ⲕⲁⲧⲁⲛⲉⲩⲉ ⲛ̅ϭⲓ ⲧⲁⲣⲭⲟⲛⲧ̣ⲓ[ⲕⲏ ⲧⲏⲣ̅ⲥ̅ ⲛ̅]‐ <text:line-break/><text:span text:style-name="T1"> </text:span><text:span text:style-name="T2">(26/5) </text:span> ⲛ̅ⲉⲝⲟⲩⲥⲓⲁ ⲁⲩⲛⲁⲩ ⲉⲡⲣⲱⲙ̣ⲉ̣ [ⲉϥⲟⲩⲱ]‐ <text:line-break/><text:span text:style-name="T1"> </text:span><text:span text:style-name="T2">(26/6) </text:span> ⲧ̅ⲃ̅ ⲉⲣⲟⲟⲩ ⲁⲩⲱ ⲁⲩⲉⲓⲣⲉ ⲛ̅ⲟⲩϣⲁ̣[ϫⲛⲉ] <text:line-break/><text:span text:style-name="T1"> </text:span><text:span text:style-name="T2">(26/7) </text:span> ⲙ̅ⲛ̅ ⲛ̅ⲁⲅ·ⲅⲉⲗⲟⲥ ⲙ̅ⲛ̅ ⲛ̅ⲁⲣⲭⲱⲛ̣ [ⲙ̅ⲛ̅ ⲡ]‐ <text:line-break/><text:span text:style-name="T1"> </text:span><text:span text:style-name="T2">(26/8) </text:span> ϣⲱϫⲡ·ⲛ̅ⲛ̅ϭⲟⲙ·ⲧⲟⲧⲉ ⲡⲉ[ⲕⲱϩⲧ ⲙ̅ⲛ̅] <text:line-break/><text:span text:style-name="T1"> </text:span><text:span text:style-name="T2">(26/9) </text:span> ⲡⲕⲁϩ ⲉⲁⲩⲙⲟⲩϫⲕ ⲛ̅ⲟⲩⲙⲟⲟ̣[ⲩ ⲙ̅ⲛ̅ ⲡⲉ]‐ <text:line-break/><text:span text:style-name="T1"> </text:span><text:span text:style-name="T2">(26/10) </text:span> ⲕⲣⲱⲙ· ⲁⲩⲙⲟⲩϫⲧ ⲙ̅ⲙⲟⲟⲩ [ⲙ̅ⲛ̅ ⲡⲉϥ]‐ <text:line-break/><text:span text:style-name="T1"> </text:span><text:span text:style-name="T2">(26/11) </text:span> ⲧⲟⲟⲩ ⲛ̅ⲧⲏⲟⲩ ⲉ̣ⲩⲛⲓϥⲉ· ϩ̅ⲛ̅ ⲟⲩ[ⲕⲱϩⲧ] <text:line-break/><text:span text:style-name="T1"> </text:span><text:span text:style-name="T2">(26/12) </text:span> ⲉ̣[ⲩⲧⲱ]ϭ̣ⲉ̣ ⲉ[ⲛ]ⲉⲣⲛⲟⲩ[ⲏ]ⲁ̣ⲩⲉ[ⲓⲣⲉ ⲛ̅ⲟⲩ]‐ <text:line-break/><text:span text:style-name="T1"> </text:span><text:span text:style-name="T2">(26/13) </text:span> ⲛⲟϭ ⲛ̣[ϣⲧⲟⲣⲧ̅ⲣ̅ ⲁⲩⲱ ⲁⲩⲛ̅ⲧϥ ⲉ]‐ <text:line-break/><text:span text:style-name="T1"> </text:span><text:span text:style-name="T2">(26/14) </text:span> ϩⲟ̣ⲩ̣ⲛ̣ ⲉ̣ⲑ̣[ⲁⲓ̈ⲃⲉⲥ ⲙ̅ⲡⲙⲟⲩ ⲁⲩⲉⲓⲣⲉ ⲛ̅ⲟⲩ]‐ <text:line-break/><text:span text:style-name="T1"> </text:span><text:span text:style-name="T2">(26/15) </text:span> ⲕⲉⲁⲛⲁⲡⲗⲁⲥⲓⲥ̣ ⲛⲕ̣[ⲉⲥⲟⲡ ⲉⲃⲟⲗ ϩ̅ⲙ̅ <text:line-break/><text:span text:style-name="T1"> </text:span><text:span text:style-name="T2">(26/16) </text:span> ⲡⲕⲁϩ ⲙ̅ⲛ̅ ⲡⲙⲟⲟⲩ ⲙ̅ⲛ̅ ⲡ̣[ⲕⲱϩⲧ] <text:line-break/><text:span text:style-name="T1"> </text:span><text:span text:style-name="T2">(26/17) </text:span> ⲙ̅ⲛ̅ ⲡⲉⲡ̅ⲛⲁ̅ ⲉⲧⲉ ⲡⲁⲓ̈ ⲡⲉ [ⲉⲃⲟⲗ ϩ̅ⲛ̅] <text:line-break/><text:span text:style-name="T1"> </text:span><text:span text:style-name="T2">(26/18) </text:span> ⲧϩⲩⲗⲏ ⲙ̅ⲡⲕⲁⲕⲉ ⲙ̅ⲛ̅ ⲧⲉ[ⲡⲓⲑⲩ]‐ <text:line-break/><text:span text:style-name="T1"> </text:span><text:span text:style-name="T2">(26/19) </text:span> ⲙⲓⲁ ⲙ̅ⲛ̅ ⲡⲉⲩⲁⲛⲧⲓⲙⲓⲙⲟⲛ̣ [ⲛ̅ⲡ̅ⲛⲁ̅ ⲉⲧⲉ] <text:line-break/><text:span text:style-name="T1"> </text:span><text:span text:style-name="T2">(26/20) </text:span> ⲡⲁⲓ̈ ⲡⲉ ⲧⲉⲛⲙ̅ⲣ̅ⲣⲉ ⲡⲁⲓ̈ ⲡⲉ ⲡ̣[ⲉⲥⲡⲏ]‐ <text:line-break/><text:span text:style-name="T1"> </text:span><text:span text:style-name="T2">(26/21) </text:span> ⲗⲁⲓⲟⲛ ⲛ̅ⲧⲁⲛⲁⲡⲗⲁⲥⲓⲥ ⲙ̅ⲡⲥⲱ̣[ⲙⲁ ⲡⲁⲓ̈] <text:line-break/><text:span text:style-name="T1"> </text:span><text:span text:style-name="T2">(26/22) </text:span> ⲛ̅ⲧⲁϥϯ ⲙ̅ⲙⲟϥ ϩⲓ ⲡⲣⲱⲙ̣[ⲉ ⲛ̅ϭⲓ ⲛⲥⲟ]‐ <text:line-break/><text:span text:style-name="T1"> </text:span><text:span text:style-name="T2">(26/23) </text:span> ⲟⲛⲉ ⲧⲙ̅ⲣⲣⲉ ⲛ̅ⲧⲁⲗⲏⲑⲏ ⲁⲩ̣[ⲱ ⲛ̅ⲧⲉⲓ] <text:line-break/><text:span text:style-name="T1"> </text:span><text:span text:style-name="T2">(26/24) </text:span> ϩⲉ ⲁ ⲡⲣⲱⲙⲉ ϣⲱ̣[ⲡⲉ ⲉϣⲁϥ] <text:line-break/><text:span text:style-name="T1"> </text:span><text:span text:style-name="T2">(26/25) </text:span> ⲙⲟⲩ ⲡⲁⲓ̈ ⲡⲉ ⲡⲉϩⲟⲩⲉⲓⲧ· ⲛ̅ⲉⲓ̣[ⲉⲡⲉⲥⲏⲧ] <text:line-break/><text:span text:style-name="T1"> </text:span><text:span text:style-name="T2">(27/1) </text:span> [ⲁⲩⲱ] ⲡⲉϩⲟⲩⲉⲓⲧ· ⲛ̅ⲡⲱⲣϫ·ⲙ̅ⲙⲟϥ ⲉⲃⲟⲗ <text:line-break/><text:span text:style-name="T1"> </text:span><text:span text:style-name="T2">(27/2) </text:span> [ⲧⲉ]ⲛ̣ⲛⲟⲓⲁ ϭⲉ ⲛ̅ⲡⲉⲡⲣⲟⲟⲛⲧⲟⲥ ⲛ̅ⲟⲩ‐ <text:line-break/><text:span text:style-name="T1"> </text:span><text:span text:style-name="T2">(27/3) </text:span> [ⲟⲉⲓ]ⲛ̣ [ⲉ]ⲥϣⲱⲡⲉ ⲛ̅ϩⲣⲁⲓ̈ ⲛ̅ϩⲏⲧ̅ϥ̅ ⲉⲥ‐ <text:line-break/><text:span text:style-name="T1"> </text:span><text:span text:style-name="T2">(27/4) </text:span> [ⲧⲱⲟⲩ]ⲛ̣ ⲙ̅ⲡⲉϥⲙⲉⲟⲩⲉ ⲉϩⲣⲁⲓ̈ ⲁⲩⲱ <text:line-break/><text:span text:style-name="T1"> </text:span><text:span text:style-name="T2">(27/5) </text:span> [ⲁϥϫⲓ] ⲙ̣̅ⲙⲟϥ ⲛ̅ϭⲓ ⲡⲉϩⲟⲩⲉⲓⲧ· ⲛ̅ⲁⲣⲭⲱⲛ <text:line-break/><text:span text:style-name="T1"> </text:span><text:span text:style-name="T2">(27/6) </text:span> [ⲁϥⲕ]ⲱ̣ ⲙ̅ⲙⲟϥ ϩ̅ⲙ̅ ⲡ·ⲡⲁⲣⲁⲇⲓⲥⲟⲥ ⲡⲉ‐ <text:line-break/><text:span text:style-name="T1"> </text:span><text:span text:style-name="T2">(27/7) </text:span> [ⲉⲓ ⲉⲛⲉ]ϥϫⲱ ⲙ̅ⲙⲟⲥ ⲉⲣⲟϥ ϫⲉ ⲡⲁ ⲧⲉϥ ⲧⲣⲩ‐ <text:line-break/><text:span text:style-name="T1"> </text:span><text:span text:style-name="T2">(27/8) </text:span> [ⲫⲏ ⲡ]ⲉ ⲉⲧⲉ ⲡⲁⲓ̈ ⲡⲉ ⲛϥⲁⲡⲁⲧⲁ ⲙ̅ⲙⲟϥ <text:line-break/><text:span text:style-name="T1"> </text:span><text:span text:style-name="T2">(27/9) </text:span> [ⲧⲉⲩⲧ]ⲣ̣ⲟⲫⲏ ⲅⲁⲣ ⲛⲉⲩⲥⲓϣⲉ ⲧⲉ ⲁⲩⲱ ⲡⲉⲩ‐ <text:line-break/><text:span text:style-name="T1"> </text:span><text:span text:style-name="T2">(27/10) </text:span> [ⲥⲁ] ⲛ̣ⲉⲩⲁⲛⲟⲙⲟⲛ ⲡⲉ ⲁⲩⲱ ⲧⲉⲩⲧⲣⲟ‐ <text:line-break/><text:span text:style-name="T1"> </text:span><text:span text:style-name="T2">(27/11) </text:span> [ⲫⲏ ⲛ]ⲉ̣ⲩⲁⲡⲁⲧⲏ ⲧⲉ ⲁ̣ⲩ̣ⲱ ⲛⲉⲩϣⲏⲛ <text:line-break/><text:span text:style-name="T1"> </text:span><text:span text:style-name="T2">(27/12) </text:span> [ⲛⲉⲩⲙ̅ⲛ̅]ⲧ̣[ϣⲁϥⲧ]ⲉ̣ [ⲡⲉ ⲡⲉⲩⲕⲁⲣⲡⲟⲥ] <text:line-break/><text:soft-page-break/><text:span text:style-name="T1"> </text:span><text:span text:style-name="T2">(27/13) </text:span> [ⲛⲉⲩⲙⲁⲧⲟⲩ ⲡⲉ ⲉⲙ̅ⲛ̅ ⲧⲁⲗϭⲟ ⲛ̅ϩⲏⲧ̅ϥ̅]ⲁⲩ <text:line-break/><text:span text:style-name="T1"> </text:span><text:span text:style-name="T2">(27/14) </text:span> [ⲱ ⲡⲉⲩⲉⲣⲏⲧ ⲛⲉⲩⲙⲟⲩ ⲛ]ⲁⲩ̣ ⲡⲉ ⲡϣⲏⲛ <text:line-break/><text:span text:style-name="T1"> </text:span><text:span text:style-name="T2">(27/15) </text:span> [ⲇⲉ ⲛ̅ⲧⲁⲩⲕⲁⲁ]ϥ̣ϫ̣ⲉ̣ ⲡⲁ ⲡⲱⲛϩ ⲡⲉ ⲁⲛⲟⲕ <text:line-break/><text:span text:style-name="T1"> </text:span><text:span text:style-name="T2">(27/16) </text:span> [ⲇⲉ ϯⲛⲁ]ⲧⲁⲙⲉ ⲧⲏⲛⲟⲩ ϫⲉⲟⲩ ⲡⲉ ⲡⲙⲩ‐ <text:line-break/><text:span text:style-name="T1"> </text:span><text:span text:style-name="T2">(27/17) </text:span> [ⲥⲧⲏⲣⲓⲟ]ⲛ̣ ⲙ̅ⲡⲉⲩⲱⲛϩ ⲉⲧⲉ ⲡⲁⲓ̈ ⲡⲉ ⲡⲉⲩ <text:line-break/><text:span text:style-name="T1"> </text:span><text:span text:style-name="T2">(27/18) </text:span> [ⲡ̅ⲛ̅ⲁ̅ ⲛ̅]ⲁ̣ⲛⲧⲓⲙⲓⲙⲟⲛ ⲉⲃⲟⲗ ϩ̅ⲛ̅ ⲛⲉⲩⲉ‐ <text:line-break/><text:span text:style-name="T1"> </text:span><text:span text:style-name="T2">(27/19) </text:span> [ⲣⲏⲩ ⲉ]ⲧⲣⲉⲩⲕⲱⲧⲉ ⲙ̅ⲙⲟϥ ⲉⲡⲁϩⲟⲩ <text:line-break/><text:span text:style-name="T1"> </text:span><text:span text:style-name="T2">(27/20) </text:span> [ϫⲉⲕ]ⲁ̣ⲁⲥ ⲛ̅ⲛⲉϥⲛⲟⲉⲓ ⲙ̅ⲡⲉϥⲡⲗⲏⲣⲱ‐ <text:line-break/><text:span text:style-name="T1"> </text:span><text:span text:style-name="T2">(27/21) </text:span> [ⲙⲁ] ⲁ̣ⲩⲱ ⲡϣⲏⲛ ⲉⲧ̅ⲙ̅ⲙⲁⲩ ⲟⲩⲧⲉⲉⲓ <text:line-break/><text:span text:style-name="T1"> </text:span><text:span text:style-name="T2">(27/22) </text:span> [ⲙⲓⲛⲉ ⲡ]ⲉ̣ ⲧⲉϥⲛⲟⲩⲛⲉ ϣⲏⲥ ⲁⲩⲱ <text:line-break/><text:span text:style-name="T1"> </text:span><text:span text:style-name="T2">(27/23) </text:span> [ⲛⲉϥⲕⲗ]ⲁⲇⲟⲥ ϩⲉⲛϩⲁⲉⲓⲃⲉ ⲛⲉ ⲛ̅ⲧⲉ ⲡ‐ <text:line-break/><text:span text:style-name="T1"> </text:span><text:span text:style-name="T2">(27/24) </text:span> [ⲙⲟ]ⲩ̣ ⲁⲩ̣ⲱ ⲛⲉϥϭⲱⲃⲉ ϩⲉⲛⲙⲉⲥⲧⲉ ⲛⲉ <text:line-break/><text:span text:style-name="T1"> </text:span><text:span text:style-name="T2">(28/1) </text:span> ϩⲓ̣ ⲁⲡⲁⲧⲏ ⲁⲩⲱ ⲡⲉϥⲧⲱϩⲥ ⲟⲩⲧⲱϩ[ⲥ ⲛ̅ⲧ]‐ <text:line-break/><text:span text:style-name="T1"> </text:span><text:span text:style-name="T2">(28/2) </text:span> ⲡⲟⲛⲏⲣⲓⲁ ⲡⲉ ⲁⲩⲱ ⲡⲉϥⲕⲁⲣⲡⲟⲥ [ⲛ]‐ <text:line-break/><text:span text:style-name="T1"> </text:span><text:span text:style-name="T2">(28/3) </text:span> ⲟⲩⲉⲡⲓⲑⲩⲙⲓⲁ ⲛ̅ⲧⲉ ⲡⲙⲟⲩⲟⲩ ⲡ[ⲉ ⲁⲩ]‐ <text:line-break/><text:span text:style-name="T1"> </text:span><text:span text:style-name="T2">(28/4) </text:span> ⲱ ⲡⲉϥⲥⲡⲉⲣⲙⲁ ⲁϥϯ ⲟⲩⲱ̣ [ⲉⲃⲟⲗ ϩ̅ⲛ̅ <text:line-break/><text:span text:style-name="T1"> </text:span><text:span text:style-name="T2">(28/5) </text:span> ⲟⲩⲕⲉⲕⲉ ⲛⲉⲧϫⲓ ϯⲡⲉ ⲙ̅ⲙⲟ[ϥ ⲡⲉⲩ]‐ <text:line-break/><text:span text:style-name="T1"> </text:span><text:span text:style-name="T2">(28/6) </text:span> ⲙⲁ ⲛ̅ϣⲱⲡⲉ ⲡⲉ ⲁⲙ̅ⲛ̅ⲧⲉ ⲡ[ϣⲏⲛ ⲇⲉ] <text:line-break/><text:span text:style-name="T1"> </text:span><text:span text:style-name="T2">(28/7) </text:span> ⲉⲧⲟⲩⲙⲟⲩⲧⲉ ⲉⲣⲟϥ ⲉⲃⲟⲗ ϩⲓⲧ[ⲟⲟⲧⲟⲩ] <text:line-break/><text:span text:style-name="T1"> </text:span><text:span text:style-name="T2">(28/8) </text:span> ϫⲉ ⲡⲥⲟⲩ̅ⲛ̅ ⲡⲉⲧⲛⲁⲛⲟⲩϥ ⲙ̅ⲛ̅ [ⲡⲉⲧϩⲟ]‐ <text:line-break/><text:span text:style-name="T1"> </text:span><text:span text:style-name="T2">(28/9) </text:span> ⲟⲩ ⲉⲧⲉ ⲧⲉⲡⲓⲛⲟⲓⲁ ⲙ̅ⲡⲟⲩⲟⲉⲓⲛ ⲧ̣[ⲁⲓ̈] <text:line-break/><text:span text:style-name="T1"> </text:span><text:span text:style-name="T2">(28/10) </text:span> ⲛ̅ⲧⲁⲩϯ ⲉⲛⲧⲟⲗⲏ ⲉⲧⲃⲏⲏⲧ̅ⲥ̅· ϫⲉ [ⲙ̅ⲡⲣ]‐ <text:line-break/><text:span text:style-name="T1"> </text:span><text:span text:style-name="T2">(28/11) </text:span> ⲟⲩⲱⲙ ⲉⲃⲟⲗ ⲛ̣̅ϩ̣ⲏⲧ̅ⲥ̅ ⲉⲧⲉ ⲡⲉⲉ[ⲓ ⲡⲉ ⲉ]‐ <text:line-break/><text:span text:style-name="T1"> </text:span><text:span text:style-name="T2">(28/12) </text:span> ⲧ̅ⲙ̣̅̅ⲥ̣ⲱ̣ⲧ̣̅ⲙ̣̅ ⲛ̅ⲥ̣ⲱ̣ⲥ ⲉⲃⲟⲗ ϫⲉ ⲛ̣[ⲉⲥ] <text:line-break/><text:span text:style-name="T1"> </text:span><text:span text:style-name="T2">(28/13) </text:span> ϯ̣ⲟ̣[ⲩⲃⲏϥ ϫⲉ ⲛ̅ⲛⲉϥϭⲱϣ̅ⲧ̅ ⲉⲧⲡⲉ]‐ <text:line-break/><text:span text:style-name="T1"> </text:span><text:span text:style-name="T2">(28/14) </text:span> ⲉⲡ̣[ⲉϥϫⲱⲕ ⲁⲩⲱ ⲛ̅ϥ̅ⲣ̅ⲛⲟⲉⲓ ⲙ̅ⲡⲉϥ]‐ <text:line-break/><text:span text:style-name="T1"> </text:span><text:span text:style-name="T2">(28/15) </text:span> ⲕⲱⲕ ⲁϩⲏⲟ[ⲩ ⲉⲃⲟⲗ ϩ̅ⲙ̅ ⲡⲉϥⲡⲗⲏⲣⲱ]‐ <text:line-break/><text:span text:style-name="T1"> </text:span><text:span text:style-name="T2">(28/16) </text:span> ⲙⲁ· ⲁⲛⲟⲕ ⲇⲉ ⲁⲉⲓⲧⲁϩ̣[ⲟ ⲙ̅ⲙⲟϥ ⲉ]‐ <text:line-break/><text:span text:style-name="T1"> </text:span><text:span text:style-name="T2">(28/17) </text:span> ⲣⲁⲧ̅ϥ̅ ⲉⲧⲣⲉϥⲟⲩⲱⲙ ⲁⲩⲱ ⲡ[ⲉϫⲁⲓ̈ ⲛⲁϥ] <text:line-break/><text:span text:style-name="T1"> </text:span><text:span text:style-name="T2">(28/18) </text:span> ϫⲉ ⲡϫⲟⲉⲓⲥ ⲙ̅ⲡϩⲟϥ ⲣⲱ ⲁ̣[ⲛ ⲡⲉ ⲛ̅ⲧⲁϥ ⲧⲟⲩ]‐ <text:line-break/><text:span text:style-name="T1"> </text:span><text:span text:style-name="T2">(28/19) </text:span> ⲛⲟⲩⲉⲓⲁⲧ̅ϥ̅ ⲉⲃⲟⲗ· ⲁϥⲥⲱⲃⲉ ⲡ̣[ⲉϫⲁϥ] <text:line-break/><text:span text:style-name="T1"> </text:span><text:span text:style-name="T2">(28/20) </text:span> ϫⲉ ⲡϩⲟϥ ⲛ̅ⲧⲁϥⲟⲩⲱⲛϩ ⲛⲁⲩ ⲉ̣[ⲃⲟⲗ ⲉⲧⲉ] <text:line-break/><text:span text:style-name="T1"> </text:span><text:span text:style-name="T2">(28/21) </text:span> ⲥⲡⲟⲣⲁ ⲛ̅ⲉⲡⲓⲑⲩⲙⲓⲁ ⲉⲥⲥⲟⲟϥ ⲡ[ⲉ ⲛ̅ⲧⲉ] <text:line-break/><text:span text:style-name="T1"> </text:span><text:span text:style-name="T2">(28/22) </text:span> ⲡⲧ̣ⲁⲕⲟ ϫⲉⲕⲁⲁⲥ ⲉϥⲛⲁϣ[ⲱⲡⲉ ⲛⲁϥ] <text:line-break/><text:span text:style-name="T1"> </text:span><text:span text:style-name="T2">(28/23) </text:span> ⲛ̅ⲟⲩⲉⲩⲭⲣⲏⲥⲧⲟⲥ ⲁϥⲙ̅ⲙⲉ [ϫⲉ] <text:line-break/><text:span text:style-name="T1"> </text:span><text:span text:style-name="T2">(28/24) </text:span> ⲙ̅ⲡⲉϥⲥⲱⲧⲙ̅ ⲛ̅ⲥⲱϥ ϫⲉ ⲁϥ[ⲣ̅ⲥⲁⲃⲉ] <text:line-break/><text:span text:style-name="T1"> </text:span><text:span text:style-name="T2">(28/25) </text:span> ⲛ̅ϩⲟⲩⲟ ⲉⲣⲟϥ ⲁϥⲣ̅ϩⲛⲁϥ· ⲉⲧⲱⲕ̣[ⲉ ⲛ̅]‐ <text:line-break/><text:span text:style-name="T1"> </text:span><text:span text:style-name="T2">(29/1) </text:span> ⲧⲇⲩⲛⲁⲙⲓⲥ ⲉⲃⲟⲗ ⲛ̅ϩⲏⲧ̅ϥ̅ ⲁⲩⲱ ⲁϥ ⲥⲓⲧⲉ <text:line-break/><text:span text:style-name="T1"> </text:span><text:span text:style-name="T2">(29/2) </text:span> ⲛ̅ⲟⲩⲉⲕⲥⲧⲁⲥⲓⲥ ⲉϫ̅ⲛ̅ ⲁⲇⲁⲙ ⲁⲛⲟⲕ ⲇⲉ <text:line-break/><text:span text:style-name="T1"> </text:span><text:span text:style-name="T2">(29/3) </text:span> ⲡⲉϫⲁⲓ̈ ϫⲉ ⲡϫⲟⲉⲓⲥ ⲟⲩ ⲡⲉ ⲉⲕⲥⲧⲁⲥⲓⲥ <text:line-break/><text:span text:style-name="T1"> </text:span><text:span text:style-name="T2">(29/4) </text:span> ⲁϥⲥⲱⲃⲉ ⲡⲉϫⲁϥ ϫⲉ ⲉⲕⲙⲉⲉⲩⲉ ϫⲉ ⲕⲁⲧⲁ <text:line-break/><text:span text:style-name="T1"> </text:span><text:span text:style-name="T2">(29/5) </text:span> ⲑⲉ ⲛ̅ⲧⲁ ⲙⲱⲩⲥⲏⲥ ϫⲟⲟⲥ ϫⲉ ⲁϥⲧⲣⲉϥⲛ̅‐ <text:line-break/><text:span text:style-name="T1"> </text:span><text:span text:style-name="T2">(29/6) </text:span> [ⲕ]ⲟ̣ⲧⲕ· ⲙ̅ⲙⲟⲛ ⲁⲗⲗⲁ ⲛ̅ⲧⲁϥϩⲱⲃ̅ⲥ̅ ⲉⲃⲟⲗ <text:line-break/><text:span text:style-name="T1"> </text:span><text:span text:style-name="T2">(29/7) </text:span> [ⲉ]ϫ̣̅̅ⲛ̅ ⲛⲉϥⲁⲓⲥⲑⲏⲥⲓⲥ ⲛ̅ⲟⲩⲁⲛⲁⲓⲑⲏⲥⲓⲁ <text:line-break/><text:span text:style-name="T1"> </text:span><text:span text:style-name="T2">(29/8) </text:span> ⲕ̣ⲁⲓ ⲅⲁⲣ ⲁϥϫⲟⲟⲥ ⲉⲃⲟⲗ ϩⲓⲧⲟⲟⲧ̅ϥ̅ ⲙ̅ⲡⲉ‐ <text:line-break/><text:span text:style-name="T1"> </text:span><text:span text:style-name="T2">(29/9) </text:span> ⲡ̣ⲣ̣ⲟ̣ⲫⲏⲧⲏⲥ ⲉϥϫⲱ ⲙ̅ⲙⲟⲥ ϫⲉ ϯⲛⲁ <text:line-break/><text:span text:style-name="T1"> </text:span><text:span text:style-name="T2">(29/10) </text:span> [ⲑⲣϣ]ⲟ ⲛ̅ⲛ̅ⲙ̅ⲙⲁⲁϫⲉ ⲛ̅ⲛⲉⲩϩⲏⲧ· ϫⲉ <text:line-break/><text:soft-page-break/><text:span text:style-name="T1"> </text:span><text:span text:style-name="T2">(29/11) </text:span> [ⲕⲁⲁⲥ] ⲛ̅ⲛⲉⲩⲛⲟⲉⲓ· ⲟ[ⲩ]ⲧⲉ ⲛ̅ⲛⲉⲩⲛⲁⲩ <text:line-break/><text:span text:style-name="T1"> </text:span><text:span text:style-name="T2">(29/12) </text:span> [ⲉⲃⲟⲗ] ⲧ̣ⲟ̣ⲧ̣[ⲉ ⲧⲉ]ⲡ̣ⲓ̣ⲛ̣[ⲟⲓⲁ ⲙ̅ⲡⲟ]ⲩ̣ ⲟ̣ⲉ̣[ⲓⲛ] <text:line-break/><text:span text:style-name="T1"> </text:span><text:span text:style-name="T2">(29/13) </text:span> [ⲁⲥϩⲟⲡⲥ ⲙ̅ⲙⲟⲥ ⲛ̅ϩⲏⲧ̅ϥ̅ ⲁⲩ]ⲱ̣ ϩ̅ⲛ̅ ⲟⲩ‐ <text:line-break/><text:span text:style-name="T1"> </text:span><text:span text:style-name="T2">(29/14) </text:span> [ⲟⲩⲱϣ ⲁϥⲣ̅ϩⲛⲁϥ ⲉⲛ̅ⲧ̅]ⲥ̣̅ ⲉⲃⲟⲗ ϩ̅ⲙ̅ ⲡⲉϥ‐ <text:line-break/><text:span text:style-name="T1"> </text:span><text:span text:style-name="T2">(29/15) </text:span> [ⲃⲏⲧⲥⲡⲓⲣ] ⲉ̣ⲧⲙⲙⲉⲩ ⲧⲉ ⲧⲉⲡⲓⲛⲟⲓⲁ <text:line-break/><text:span text:style-name="T1"> </text:span><text:span text:style-name="T2">(29/16) </text:span> [ⲟⲩ ⲁⲧⲧ]ⲁ̣ϩⲟⲥ ⲧⲉ ⲛⲉⲣⲉ ⲡⲕⲁⲕⲉ ⲇⲓⲱⲕⲉ <text:line-break/><text:span text:style-name="T1"> </text:span><text:span text:style-name="T2">(29/17) </text:span> [ⲙ̅ⲡⲟ]ⲩⲟⲉⲓⲛ ⲙ̅ⲡϥ̅ⲧⲁϩⲉ ⲡⲟⲩⲟⲉⲓⲛ <text:line-break/><text:span text:style-name="T1"> </text:span><text:span text:style-name="T2">(29/18) </text:span> [ⲁⲩⲱ ⲁ]ϥⲟⲩⲉϣ ⲉⲓⲛⲉ ⲛ̅ⲧⲇⲩⲛⲁⲙⲓⲥ <text:line-break/><text:span text:style-name="T1"> </text:span><text:span text:style-name="T2">(29/19) </text:span> [ⲉⲃⲟⲗ ⲛ̅]ϩ̣ⲏⲧ̅ϥ̅.ⲁⲩⲱ ⲁϥⲉⲓⲣⲉ ⲛ̅ⲟⲩⲁⲛⲁ <text:line-break/><text:span text:style-name="T1"> </text:span><text:span text:style-name="T2">(29/20) </text:span> [ⲡⲗ]ⲁ̣ⲥⲓⲥ ⲛ̅ⲙⲟⲣⲫⲏ ⲛ̅ⲥϩⲓⲙⲉ ⲁⲩⲱ <text:line-break/><text:span text:style-name="T1"> </text:span><text:span text:style-name="T2">(29/21) </text:span> [ⲁϥⲧ]ⲟⲩⲛⲟⲥⲥ̅ ⲙ̅ⲡⲉϥⲙ̅ⲧⲟ ⲉⲃⲟⲗ ⲛ̅ⲕⲁ‐ <text:line-break/><text:span text:style-name="T1"> </text:span><text:span text:style-name="T2">(29/22) </text:span> [ⲧⲁ ⲑⲉ ⲁ]ⲛ̣ ⲛ̅ⲧⲁϥϫⲟⲟⲥ ⲛ̅ϭⲓ ⲙⲱⲯ̈ⲥⲏⲥ <text:line-break/><text:span text:style-name="T1"> </text:span><text:span text:style-name="T2">(29/23) </text:span> [ϫⲉ] ⲁϥϥⲓ ⲛ̅ⲟⲩⲃⲏⲧ· ⲛ̅ⲥⲡⲓⲣ ⲁϥⲧⲁ <text:line-break/><text:span text:style-name="T1"> </text:span><text:span text:style-name="T2">(29/24) </text:span> [ⲙⲓⲟ] ⲛ̣ⲟ̣ⲩⲥϩⲓⲙⲉ ⲁϥⲕⲱ ⲙ̅ⲙⲟⲥ ϩⲁⲧⲏϥ <text:line-break/><text:span text:style-name="T1"> </text:span><text:span text:style-name="T2">(30/1) </text:span> ⲛ̅ⲧⲉⲩⲛⲟⲩ ⲁϥⲛⲏⲫⲉ ⲉⲃⲟⲗ ϩ̅ⲙ̅ ⲡϯϩⲉ <text:line-break/><text:span text:style-name="T1"> </text:span><text:span text:style-name="T2">(30/2) </text:span> ⲙ̅ⲡⲙⲟⲩ ⲁ ⲧⲉⲡⲓⲛⲟⲓⲁ ϭⲱⲗⲡ· ⲉⲃⲟⲗ <text:line-break/><text:span text:style-name="T1"> </text:span><text:span text:style-name="T2">(30/3) </text:span> ⲙ̅ⲡϩⲃ̅ⲥ̅ ϩⲓϫ̅ⲙ̅ ⲡⲉϥϩⲏⲧ· ⲛ̅ⲧⲉⲩⲛⲟⲩ ⲁϥ‐ <text:line-break/><text:span text:style-name="T1"> </text:span><text:span text:style-name="T2">(30/4) </text:span> ⲥⲟⲩⲛ̅ ⲧⲉϥⲥⲩⲛⲟⲩⲥⲓⲁ ⲉϯⲛⲉ ⲙ̅ⲙⲟϥ <text:line-break/><text:span text:style-name="T1"> </text:span><text:span text:style-name="T2">(30/5) </text:span> ϫⲉ ⲧⲉⲛⲟⲩ ⲛ̅ⲧⲟ· ⲟⲩⲕⲁⲥ ⲉⲃⲟⲗ ϩ̅ⲛ̅ ⲛⲁ‐ <text:line-break/><text:span text:style-name="T1"> </text:span><text:span text:style-name="T2">(30/6) </text:span> ⲕⲁⲥ ⲛ̅ⲧⲉⲩⲥⲁⲣⲝ ⲉⲃⲟⲗ ϩ̅ⲛ̅ ⲧⲁⲥⲁⲣⲝ <text:line-break/><text:span text:style-name="T1"> </text:span><text:span text:style-name="T2">(30/7) </text:span> ⲉⲧⲃⲉ ⲡⲁⲓ̈ ⲉⲣⲉ ⲡⲣⲱⲙⲉ ⲕⲱ ⲙ̅ⲡⲉ[ϥⲉⲓ] <text:line-break/><text:span text:style-name="T1"> </text:span><text:span text:style-name="T2">(30/8) </text:span> ⲱⲧ· ⲙ̅ⲛ̅ ⲧⲉϥⲙⲁⲁⲩ ⲛ̅ⲥⲱϥ ⲉϥⲉⲕⲟⲗⲗ̣[ⲁ] <text:line-break/><text:span text:style-name="T1"> </text:span><text:span text:style-name="T2">(30/9) </text:span> ⲙ̅ⲙⲟϥ ⲉⲧⲉϥⲥϩⲓⲙⲉ ⲉⲩⲛⲁϣⲱⲡ[ⲉ] <text:line-break/><text:span text:style-name="T1"> </text:span><text:span text:style-name="T2">(30/10) </text:span> ⲙ̅ⲡⲉⲥⲛⲁⲩ ⲛ̅ⲟⲩⲥⲁⲣⲝ ⲛ̅ⲟⲩⲱⲧ̣ [ϫⲉ] <text:line-break/><text:span text:style-name="T1"> </text:span><text:span text:style-name="T2">(30/11) </text:span> ⲁⲩⲧⲁⲛ̅ⲟⲩⲟ ⲙ̅ⲡⲥⲩⲛⲍⲩⲅⲟⲥ ⲛ̅[ⲧⲙⲁⲁⲩ] <text:line-break/><text:span text:style-name="T1"> </text:span><text:span text:style-name="T2">(30/12) </text:span> ⲉⲧⲁϩⲟ ⲉⲣⲁⲧⲟ[ⲩ] ⲛ̅ⲛⲉⲥϩⲩⲥⲧⲉ̣ⲣ̣ⲏ̣[ⲙⲁ] <text:line-break/><text:span text:style-name="T1"> </text:span><text:span text:style-name="T2">(30/13) </text:span> ⲉ̣ⲧ̣ⲃⲉ̣ ⲡ̣[ⲁⲓ̈ ⲁⲇⲁⲙ ⲁϥϯ ⲣⲁⲛ] ⲙ̣̅[ⲙⲟⲥ] <text:line-break/><text:span text:style-name="T1"> </text:span><text:span text:style-name="T2">(30/14) </text:span> ϫⲉ̣ ⲧ̣[ⲙⲁⲁⲩ ⲛ̅ⲛⲉⲧⲟⲛϩ ⲧⲏⲣⲟⲩ ϩⲓⲧ̅ⲛ̅ ⲧⲙ̅ⲛⲧ̅‐ <text:line-break/><text:span text:style-name="T1"> </text:span><text:span text:style-name="T2">(30/15) </text:span> ϫⲟⲉⲓⲥ ⲙ̅ⲡ[ϫⲓⲥⲉ ⲙ̅ⲛ̅ ⲡⲟⲩⲱⲛϩ ⲉⲃⲟⲗ] <text:line-break/><text:span text:style-name="T1"> </text:span><text:span text:style-name="T2">(30/16) </text:span> ⲙ̅ⲡⲥⲟⲟⲩⲛ ⲛ̅ⲧⲁⲥ̣ⲧ̣[ⲥⲁⲃⲟ ⲉⲣⲟϥ] <text:line-break/><text:span text:style-name="T1"> </text:span><text:span text:style-name="T2">(30/17) </text:span> ⲛ̅ϭⲓ ⲧⲉⲡⲓⲛⲟⲓⲁ ϩⲓⲧ̅ⲙ̅ ⲡϣ̣[ⲏⲛ ⲙ̅ⲡⲉⲥⲙⲟⲧ] <text:line-break/><text:span text:style-name="T1"> </text:span><text:span text:style-name="T2">(30/18) </text:span> ⲛ̅ⲟⲩⲁⲉⲧⲟⲥ ⲁⲥⲧⲟⲩⲛⲟⲩⲉⲓⲁ̣[ⲧ̅ϥ̅ ⲉⲃⲟⲗ] <text:line-break/><text:span text:style-name="T1"> </text:span><text:span text:style-name="T2">(30/19) </text:span> ⲉⲟⲩⲱⲙ ϩ̅ⲙ̅ ⲡⲥⲁⲟⲩⲛ ⲉ[ⲥⲉⲣ̅ⲡⲙⲁ] <text:line-break/><text:span text:style-name="T1"> </text:span><text:span text:style-name="T2">(30/20) </text:span> ⲉⲩⲉ ⲙ̅ⲡⲉⲩⲡⲗⲏⲣⲱⲙⲁ ϫ̣[ⲉ ⲛⲉ ⲟⲩⲛ] <text:line-break/><text:span text:style-name="T1"> </text:span><text:span text:style-name="T2">(30/21) </text:span> ⲡⲧⲱⲙⲁ ⲙ̅ⲡⲉⲥⲛⲁⲩ ϩ̅ⲛ̅ ⲟⲩⲙ̅ⲛ̣̅[ⲧⲁⲧⲥⲟ] <text:line-break/><text:span text:style-name="T1"> </text:span><text:span text:style-name="T2">(30/22) </text:span> ⲟⲩⲛ ⲁϥⲉⲓⲙⲉ ϭⲉ ⲛ̅ϭⲓ ⲓ̈ⲁⲗⲧⲁⲃⲁⲱ̣[ⲑ ϫⲉ] <text:line-break/><text:span text:style-name="T1"> </text:span><text:span text:style-name="T2">(30/23) </text:span> ⲁⲩⲥⲁϩⲱⲟⲩ ⲉⲃⲟⲗ ⲙ̅ⲙⲟϥ ⲁϥ[ⲥⲟⲩϩⲱⲣ] <text:line-break/><text:span text:style-name="T1"> </text:span><text:span text:style-name="T2">(30/24) </text:span> ⲛ̅ϩⲟⲩⲟ ⲁϥⲡⲣⲟⲥⲡⲟⲓⲉⲓ ⲛ̅ⲧⲉⲥ[ϩⲓⲙⲉ ϫⲉ] <text:line-break/><text:span text:style-name="T1"> </text:span><text:span text:style-name="T2">(30/25) </text:span> ⲉⲣⲉ ⲡⲟⲩϩⲟⲟⲩⲧ ⲛⲁⲣ̅ϫⲟⲉⲓⲥ̣ [ⲉⲣⲟⲕ ⲉⲛ̅ϥ̅‐ <text:line-break/><text:span text:style-name="T1"> </text:span><text:span text:style-name="T2">(30/26) </text:span> ⲥⲟⲟⲩⲛ ⲁⲛ ⲙ̅ⲡⲙⲩⲥⲧⲏⲣⲓⲟⲛ ⲛ̅ⲧ̣[ⲁϥϣⲱ]‐ <text:line-break/><text:span text:style-name="T1"> </text:span><text:span text:style-name="T2">(31/1) </text:span> ⲡⲉ ϩ̅ⲙ̅ ⲡϣⲁϫⲛⲉ ⲙ̅ⲡⲥⲁ ⲛϩⲣⲉ ⲉⲧ̣ⲟ̣ⲩⲁ‐ <text:line-break/><text:span text:style-name="T1"> </text:span><text:span text:style-name="T2">(31/2) </text:span> ⲁⲃ ⲛ̅ⲧⲟⲟⲩ ⲇⲉ ⲁⲩⲣ̅ϩⲟⲧⲉ ⲉⲥⲁϩⲱϥ ⲉⲟⲩ‐ <text:line-break/><text:span text:style-name="T1"> </text:span><text:span text:style-name="T2">(31/3) </text:span> ⲱⲛϩ ⲛ̅ⲧⲉϥⲙ̅ⲛ̅ⲧ̅ⲁⲧⲥⲟⲟⲩⲛ ⲉⲛⲉϥⲁⲅ·ⲅⲉ‐ <text:line-break/><text:span text:style-name="T1"> </text:span><text:span text:style-name="T2">(31/4) </text:span> ⲗⲟⲥ ⲁⲩⲱ ⲁϥⲥⲓⲧⲉ ⲙ̅ⲙⲟⲟⲩ ⲉⲃⲟⲗ ⲙ̅ⲡ̅‐ <text:line-break/><text:span text:style-name="T1"> </text:span><text:span text:style-name="T2">(31/5) </text:span> ⲡⲁⲣⲁⲇⲓⲥⲟⲥ ⲁϥϯ ϩⲓⲱⲱⲟⲩ ⲛ̅ⲟⲩⲕⲁⲕⲉ <text:line-break/><text:span text:style-name="T1"> </text:span><text:span text:style-name="T2">(31/6) </text:span> ⲛ̅ⲕⲁⲕⲉ· ⲧⲟⲧⲉ ⲁϥⲛⲁⲩ ⲉⲧⲡⲁⲣⲑⲉⲛⲟⲥ <text:line-break/><text:span text:style-name="T1"> </text:span><text:span text:style-name="T2">(31/7) </text:span> ⲉ̣ⲥⲁϩⲉ ⲉⲣⲁⲧ̅ⲥ̅ ⲉⲁⲇⲁⲙ· ⲁ ⲓ̈ⲁⲗⲇⲁⲃⲁⲱⲑ· <text:line-break/><text:soft-page-break/><text:span text:style-name="T1"> </text:span><text:span text:style-name="T2">(31/8) </text:span> ⲙ̣ⲟⲩϩ ⲙ̅ⲙ̅ⲛ̅ⲧⲁⲧⲥⲟⲟⲩⲛ ⲁⲩⲱ ⲛⲉϥⲟⲩ‐ <text:line-break/><text:span text:style-name="T1"> </text:span><text:span text:style-name="T2">(31/9) </text:span> [ⲉ]ϣ ⲧⲟⲩⲛⲉⲥ ⲟⲩⲥⲡⲉⲣⲙⲁ ⲉⲃⲟⲗ ⲛ̅ϩ̅ⲏ̅ⲧⲥ̅ <text:line-break/><text:span text:style-name="T1"> </text:span><text:span text:style-name="T2">(31/10) </text:span> [ⲁⲩⲱ] ⲁϥϫⲱϩ̅ⲙ̅ ⲙⲙⲟⲥ ⲁϥϫⲡⲟ ⲙ̅ⲡⲉ‐ <text:line-break/><text:span text:style-name="T1"> </text:span><text:span text:style-name="T2">(31/11) </text:span> [ϩⲟⲩⲉⲓ]ⲧ· ⲛ̅ϣⲏⲣⲉ· ϩ̣ⲟ̣ⲙⲟⲓⲱⲥ ⲡⲙⲉϩ‐ <text:line-break/><text:span text:style-name="T1"> </text:span><text:span text:style-name="T2">(31/12) </text:span> [ⲥⲛⲁⲩ ⲉ̅ⲓ̅]̅ⲁ̅ⲟ̅ⲩ̣̅̅ⲁ̣̅̅ⲓ̣̅̅ ⲡϩ[ⲁ] ⲛ̣ⲁⲣⲝ· ⲙ̅ⲛ̅ ⲉ̣̅ⲗⲱ̅‐ <text:line-break/><text:span text:style-name="T1"> </text:span><text:span text:style-name="T2">(31/13) </text:span> [ⲉ̅ⲓ̅ⲙ̅ ⲡϩⲁ ⲛ̅ⲉⲙ]ⲟ̣ⲩ̣· ⲟⲩⲁ ⲙⲉⲛ ⲟⲩⲇⲓ ⲕⲁⲓ <text:line-break/><text:span text:style-name="T1"> </text:span><text:span text:style-name="T2">(31/14) </text:span> [ⲟⲥ ⲡⲉ ⲡⲕⲉⲟⲩ]ⲁ ⲇⲉ ⲟⲩⲁⲇⲓⲕⲟⲥ ⲡⲉ· ⲉ‐ <text:line-break/><text:span text:style-name="T1"> </text:span><text:span text:style-name="T2">(31/15) </text:span> [ⲗⲱⲉⲓⲙ ⲡⲉ ⲡ]ⲇ̣ⲓⲕⲁⲓⲟⲥ ⲉⲓⲁⲟⲩⲁⲓ ⲡⲉ ⲡⲁ‐ <text:line-break/><text:span text:style-name="T1"> </text:span><text:span text:style-name="T2">(31/16) </text:span> [ⲇⲓⲕⲟⲥ ⲡ]ⲇ̣ⲓ̣ⲕⲁⲓⲟⲥ ⲙⲉⲛ ⲁⲩⲁⲡⲟⲕⲁⲑⲓⲥ <text:line-break/><text:span text:style-name="T1"> </text:span><text:span text:style-name="T2">(31/17) </text:span> [ⲧⲁ ⲙ̅ⲙ]ⲟ̣ϥ ⲉϩⲣⲁⲓ̈ ⲉϫ̅ⲙ̅ ⲡⲉⲕⲣⲱⲙ· ⲙ̅ⲛ̅ <text:line-break/><text:span text:style-name="T1"> </text:span><text:span text:style-name="T2">(31/18) </text:span> [ⲡⲉⲡ̅ⲛ̅]ⲁ̣̅· ⲡⲁⲇⲓⲕⲟⲥ ⲇⲉ ⲉϫ̅ⲙ̅ ⲡⲕⲁϩ ⲙ̅ⲛ̅ <text:line-break/><text:span text:style-name="T1"> </text:span><text:span text:style-name="T2">(31/19) </text:span> [ⲡⲙⲟⲟ]ⲩ̣ ⲛⲁⲓ̈ ⲛⲉ ⲉϣⲁⲩⲙⲟⲩⲧⲉ ⲉⲣⲟⲟⲩ <text:line-break/><text:span text:style-name="T1"> </text:span><text:span text:style-name="T2">(31/20) </text:span> [ϩ̅ⲛ̅ ⲛ̅]ⲅ̣ⲉⲛⲉⲁ ⲧⲏⲣⲟⲩ ϫⲉ ⲁⲃⲉⲗ ⲙ̅ⲛ̅ ⲕⲁ‐ <text:line-break/><text:span text:style-name="T1"> </text:span><text:span text:style-name="T2">(31/21) </text:span> [ⲉⲓⲛ] ϣⲁϩⲣⲁⲓ̈ ⲉⲡⲟⲟⲩ ⲛ̅ϩⲟⲟⲩ· ⲁ ⲡⲥⲩ‐ <text:line-break/><text:span text:style-name="T1"> </text:span><text:span text:style-name="T2">(31/22) </text:span> [ⲛⲟⲩⲥⲓⲁ ⲛ̅ⲅⲁ]ⲙⲟⲥ ϭⲱ ⲉϥⲙⲏⲛ ⲉⲃⲟⲗ ϩⲓ‐ <text:line-break/><text:span text:style-name="T1"> </text:span><text:span text:style-name="T2">(31/23) </text:span> [ⲧⲟⲟⲧ̅ϥ̅] ⲙ̅ⲡⲉϩⲟⲩⲉⲓⲧ· ⲛ̅ⲁⲣⲭⲱⲛ ⲁⲩⲱ <text:line-break/><text:span text:style-name="T1"> </text:span><text:span text:style-name="T2">(32/1) </text:span> ⲑⲩ̣ⲙⲓⲁ ϩⲱⲥⲧⲉ ⲉⲃⲟⲗ ϩⲓⲧⲟⲟⲧ̅ⲥ̅ ⲛ̅ϯⲟⲩ‐ <text:line-break/><text:span text:style-name="T1"> </text:span><text:span text:style-name="T2">(32/2) </text:span> ⲥⲓⲁ ⲛ̅ⲥⲉϫⲡⲟ ⲙ̅ⲡⲉⲩⲉⲓⲛⲉ ⲉⲃⲟⲗ ϩⲓⲧⲟ‐ <text:line-break/><text:span text:style-name="T1"> </text:span><text:span text:style-name="T2">(32/3) </text:span> ⲟⲧ̅ϥ̅ ⲙ̅ⲡⲉⲩⲁⲛⲧⲓⲙⲓⲙⲟⲛ ⲙ̅ⲡ̅ⲛⲁ̅ ⲛ̅ⲁⲣ‐ <text:line-break/><text:span text:style-name="T1"> </text:span><text:span text:style-name="T2">(32/4) </text:span> ⲭⲱⲛ ⲙ̅ⲡⲉⲥⲛⲁⲩ ⲁⲩⲁⲡⲟⲕⲁⲑⲓⲥⲧⲁ ⲙ̅‐ <text:line-break/><text:span text:style-name="T1"> </text:span><text:span text:style-name="T2">(32/5) </text:span> ⲙⲟⲟⲩ ⲉϫ̅ⲛ̅ ϩⲉⲛⲁⲣⲭⲏ· ϩⲱⲥⲧⲉ ⲛ̅ⲥⲉⲁⲣ‐ <text:line-break/><text:span text:style-name="T1"> </text:span><text:span text:style-name="T2">(32/6) </text:span> ⲭⲉⲓ ⲉϫ̅ⲙ̅ ⲡⲉⲥⲡⲏⲗⲁⲓⲟⲛ· ⲁϥⲥⲟⲩⲛ̅ ⲧⲉϥ‐ <text:line-break/><text:span text:style-name="T1"> </text:span><text:span text:style-name="T2">(32/7) </text:span> ⲁⲛⲟⲙⲓⲁ ⲙ̅ⲙⲓⲛ ⲙ̅ⲙⲟϥ ⲁϥϫⲡⲟ ⲛ̅‐ <text:line-break/><text:span text:style-name="T1"> </text:span><text:span text:style-name="T2">(32/8) </text:span> ⲥ̅ⲏ̅ⲑ̅· ⲕⲁⲧⲁ ⲧⲅⲉⲛⲉⲁ ⲙ̅ⲡⲥⲁ ⲛϩⲣⲉ ϩⲣⲁ̣[ⲓ] <text:line-break/><text:span text:style-name="T1"> </text:span><text:span text:style-name="T2">(32/9) </text:span> ϩ̅ⲛ̅ ⲛⲁⲓⲱⲛ· ϩⲟⲙⲟⲓⲱⲥ ⲁⲩⲧ̅ⲛ̅ⲛⲟⲟ̣[ⲩ] <text:line-break/><text:span text:style-name="T1"> </text:span><text:span text:style-name="T2">(32/10) </text:span> ⲛ̅ⲧⲙⲁⲁⲩ ⲙ̅ⲡⲉⲥϩⲓⲇⲓⲟⲛ ⲙ̅ⲡ̅ⲛ̅ⲁ̅ ⲉ‐ <text:line-break/><text:span text:style-name="T1"> </text:span><text:span text:style-name="T2">(32/11) </text:span> ⲧⲟⲩⲛⲟ ⲛ̅ⲛⲉϯⲛⲉ ⲙ̅ⲙⲟϥ· ϩ̅ⲛ̣̅̅ [ⲡⲧⲩ]‐ <text:line-break/><text:span text:style-name="T1"> </text:span><text:span text:style-name="T2">(32/12) </text:span> ⲡⲟⲥ ⲛ̅ⲧⲉ ⲡⲗⲏⲣⲱⲙⲁ ⲛ̅ϥ̅ⲛ̅[ⲧⲟⲩ] <text:line-break/><text:span text:style-name="T1"> </text:span><text:span text:style-name="T2">(32/13) </text:span> [ⲉ]ⲃⲟⲗ ϩ̅ⲛ̅ ⲧⲗⲏ̣ⲑ̣ⲏ ⲙ̅ⲛ̣̅ ⲧ̣ⲕ̣ⲁⲕⲓ̣[ⲁ ⲙ̅ⲡⲉⲥ]‐ <text:line-break/><text:span text:style-name="T1"> </text:span><text:span text:style-name="T2">(32/14) </text:span> ⲡⲏⲗⲁⲓⲟⲛ· ⲁⲩⲱ [ⲁⲩⲱ̣] [ⲛ̅ϯϩⲉ ⲁⲥϭⲱ ⲡⲣⲟⲥ] <text:line-break/><text:span text:style-name="T1"> </text:span><text:span text:style-name="T2">(32/15) </text:span> ⲟⲩⲟⲉⲓϣ· ⲉⲥϩⲩⲡⲟⲩ̣[ⲣⲅⲉⲓ ϩⲁⲣⲁⲧ̅ϥ̅ ⲙ̅ⲡⲉ]‐ <text:line-break/><text:span text:style-name="T1"> </text:span><text:span text:style-name="T2">(32/16) </text:span> ⲥⲡⲉⲣⲙⲁ ϫⲉ̣ⲕ̣ⲁ̣ⲁ̣ⲥ̣ [ϩⲟⲧⲁⲛ ⲉϥϣⲁⲛⲉⲓ ⲛ̅ϭⲓ] <text:line-break/><text:span text:style-name="T1"> </text:span><text:span text:style-name="T2">(32/17) </text:span> ⲡϩⲁⲅⲓⲟⲛ ⲛ̅ⲡ̅ⲛ̅ⲁ̅ ⲉⲃⲟⲗ ϩ̣ⲓ̣[ⲧ̅ⲛ̅ <text:line-break/><text:span text:style-name="T1"> </text:span><text:span text:style-name="T2">(32/18) </text:span> ⲛ̅ⲛⲟϭ ⲛ̅ⲁⲓⲱⲛ ⲉϥⲛⲁⲧⲁϩⲟ ⲉ̣[ⲣⲁⲧⲟⲩ] <text:line-break/><text:span text:style-name="T1"> </text:span><text:span text:style-name="T2">(32/19) </text:span> ⲉⲃⲟⲗ ϩ̅ⲛ̅ ⲛⲉⲩϩⲩⲥⲧⲉⲣⲏⲙⲁ [ⲉⲧⲕⲁⲧⲟⲣ] <text:line-break/><text:span text:style-name="T1"> </text:span><text:span text:style-name="T2">(32/20) </text:span> ⲑⲱⲥⲓⲥ ⲙ̅ⲡⲁⲓⲱⲛ ϫⲉⲕⲁ̣[ⲁⲥ ⲉϥⲉ] <text:line-break/><text:span text:style-name="T1"> </text:span><text:span text:style-name="T2">(32/21) </text:span> ϣⲱⲡⲉ ⲛ̅ⲟⲩⲡⲗⲏⲣⲱⲙⲁ ⲉϥ̣[ⲟⲩⲁⲁⲃ] <text:line-break/><text:span text:style-name="T1"> </text:span><text:span text:style-name="T2">(32/22) </text:span> ϫⲉⲕⲁⲁⲥ ϭⲉ ⲛ̅ⲛⲉⲩϣⲱⲱⲧ· ⲁ̣[ⲛⲟⲕ] <text:line-break/><text:span text:style-name="T1"> </text:span><text:span text:style-name="T2">(32/23) </text:span> ϩⲱ ⲡⲉϫⲁⲓ̈ ϫⲉ ⲡϫⲟⲉⲓⲥ ⲛⲉⲯ̣[ⲩⲭⲏ] <text:line-break/><text:span text:style-name="T1"> </text:span><text:span text:style-name="T2">(32/24) </text:span> ⲛ̅ⲟⲩⲟⲛ ⲛⲓⲙ ⲥⲉⲛⲁⲛⲟⲩϩ̅ⲙ̅ [ⲉⲡϩⲉⲓⲗⲓ] <text:line-break/><text:span text:style-name="T1"> </text:span><text:span text:style-name="T2">(32/25) </text:span> ⲕⲣⲓⲛⲉⲥ ⲛ̅ⲟⲩⲟⲉⲓⲛ ⲡⲉϫⲁϥ̣ [ⲛⲁⲓ̈ ϫⲉ] <text:line-break/><text:span text:style-name="T1"> </text:span><text:span text:style-name="T2">(32/26) </text:span> ⲁⲕⲉⲓ ⲉϩⲟⲩⲛ ⲉⲧⲉⲛⲛⲟⲓⲁ ⲛ̅ϩⲛⲛ̣[ⲟϭ ⲛ̅]‐ <text:line-break/><text:span text:style-name="T1"> </text:span><text:span text:style-name="T2">(33/1) </text:span> ϩⲃⲏⲟⲩⲉ ⲉⲩⲇⲩⲥⲕⲁⲗⲟⲛ ⲡⲉ ⲉϭⲟⲗⲡⲟⲩ <text:line-break/><text:span text:style-name="T1"> </text:span><text:span text:style-name="T2">(33/2) </text:span> ⲉⲃⲟⲗ ⲛ̅ϩⲉⲛⲕⲟⲟⲩ ⲉⲓⲙⲏⲧⲓ ⲛⲏ ⲙ̅ⲙⲁⲧⲉ <text:line-break/><text:span text:style-name="T1"> </text:span><text:span text:style-name="T2">(33/3) </text:span> ⲉⲧⲉ ϩ̅ⲛ̅ ⲉⲃⲟⲗ ϩⲛ̅ ⲧⲅⲉⲛⲉⲁ ⲛ̅ⲁⲥⲁⲗⲉⲩⲧⲟⲛ <text:line-break/><text:span text:style-name="T1"> </text:span><text:span text:style-name="T2">(33/4) </text:span> ⲛⲉ ⲛⲁⲓ̈ ⲉⲧϣⲁⲣⲉ ⲡⲉⲡ̅ⲛ̅ⲁ̅ ⲛ̅ⲡⲱⲛϩ ⲉⲓ <text:line-break/><text:span text:style-name="T1"> </text:span><text:span text:style-name="T2">(33/5) </text:span> ⲉϩⲟⲩⲛ ⲉⲣⲟⲟⲩ ⲁⲩⲱ ⲛ̅ϥ̅ⲛⲟⲩϩ̅ⲃ̅ ⲙ̅ⲛ̅ ⲧϭⲟⲙ <text:line-break/><text:soft-page-break/><text:span text:style-name="T1"> </text:span><text:span text:style-name="T2">(33/6) </text:span> ⲥⲉⲛⲁⲟⲩϫⲁⲓ̈ ⲛ̅ⲧⲉⲗⲉⲓⲟⲥ ⲁⲩⲱ ⲛ̅ⲥⲉ ⲙ̅ⲡϣⲁ <text:line-break/><text:span text:style-name="T1"> </text:span><text:span text:style-name="T2">(33/7) </text:span> ⲛ̅ⲛⲓⲛⲟϭ ⲛ̅ⲟⲩⲟⲉⲓⲛ ⲡⲙⲁ ⲅⲁⲣ ⲉⲧⲙ̅ⲙⲁⲩ <text:line-break/><text:span text:style-name="T1"> </text:span><text:span text:style-name="T2">(33/8) </text:span> [ϣ]ⲁ̣ⲩ̣ⲕⲁⲑⲁⲣⲓⲍⲉ ⲙ̅ⲙⲟⲟⲩ ⲉⲃⲟⲗ ϩ̅ⲛ̅ ⲕⲁⲕⲓⲁ <text:line-break/><text:span text:style-name="T1"> </text:span><text:span text:style-name="T2">(33/9) </text:span> ⲛ̣ⲓⲙ ⲙ̅ⲛ̅ ⲛ̅ⲙ̅ⲣ̅ⲣⲉ ⲛ̅ⲧⲡⲟⲛⲏⲧⲣⲓⲁ ⲉⲛⲥⲉ‐ <text:line-break/><text:span text:style-name="T1"> </text:span><text:span text:style-name="T2">(33/10) </text:span> [ϯ ⲛ̅ϩ̅]ⲧⲏⲟⲩ ⲁⲛ ⲉⲗⲁⲁⲩ ⲉⲓⲙⲏⲧⲓ ⲉⲡⲥⲱ‐ <text:line-break/><text:span text:style-name="T1"> </text:span><text:span text:style-name="T2">(33/11) </text:span> [ⲟⲩϩ ⲛ̅]ⲁⲫⲑⲁⲣⲧⲟⲛ ⲉⲩⲙⲉⲗⲉⲧⲁ ⲛ̅ϩⲏⲧ̅ϥ̅ <text:line-break/><text:span text:style-name="T1"> </text:span><text:span text:style-name="T2">(33/12) </text:span> [ϫⲓⲛ ⲧ]ⲉ̣ⲛⲟⲩ̣ ⲭⲱⲣⲓⲥ ⲟⲣⲅⲏ ϩⲓ ⲕⲱϩ ⲭⲱ‐ <text:line-break/><text:span text:style-name="T1"> </text:span><text:span text:style-name="T2">(33/13) </text:span> [ⲣⲓⲥ ϩⲟⲧⲉϩ]ⲓ̣ ⲉⲡⲓⲑⲩⲙⲓⲁ ϩⲓ ⲡⲗⲏⲥⲙⲟ‐ <text:line-break/><text:span text:style-name="T1"> </text:span><text:span text:style-name="T2">(33/14) </text:span> [ⲛⲏ ϩ̅ⲛ̅ ⲛⲁ]ⲉⲓ ⲧⲏⲣⲟⲩ ⲉⲛⲥⲉⲁⲙⲁϩⲧⲉ <text:line-break/><text:span text:style-name="T1"> </text:span><text:span text:style-name="T2">(33/15) </text:span> [ⲁⲛ ⲉⲓⲙ]ⲏ̣ⲧⲓ ⲧⲡⲣⲟⲥϩⲩⲡⲟⲥⲧⲁⲥⲓⲥ <text:line-break/><text:span text:style-name="T1"> </text:span><text:span text:style-name="T2">(33/16) </text:span> [ⲛ̅ⲧⲥⲁⲣⲝ ⲉ]ⲩ̣ⲭⲣⲱ ⲉⲩϭⲱϣⲧ· ⲉⲃⲟⲗ ϫⲉ <text:line-break/><text:span text:style-name="T1"> </text:span><text:span text:style-name="T2">(33/17) </text:span> [ⲉⲡⲛⲁⲩ] ⲉⲧⲥⲛ̣ⲁ̣ⲡⲁⲣⲁⲗⲁⲙⲃⲁⲛⲉ ⲙ̅ⲙⲟ‐ <text:line-break/><text:span text:style-name="T1"> </text:span><text:span text:style-name="T2">(33/18) </text:span> [ⲟⲩ ϩⲓⲧⲟⲟⲧⲟ]ⲩ ⲛ̅ⲛ̅ⲡⲁⲣⲁⲗⲏⲙⲡⲧⲱⲣ <text:line-break/><text:span text:style-name="T1"> </text:span><text:span text:style-name="T2">(33/19) </text:span> [ϩ̅ⲙ̅ ⲡⲙ̅ⲡ]ϣ̣ⲁ ⲙ̅ⲡⲱⲛϩ ⲛ̅ϣⲁ ⲁⲛⲏϩⲉ <text:line-break/><text:span text:style-name="T1"> </text:span><text:span text:style-name="T2">(33/20) </text:span> [ⲙ̅ⲛ̅ ⲡ]ⲧ̣ⲱϩ̅ⲙ̅ ⲉⲩϩⲩⲡⲟⲙⲓⲛⲉ ϩⲁ ⲛ̅ⲕⲁ ⲛⲓⲙ <text:line-break/><text:span text:style-name="T1"> </text:span><text:span text:style-name="T2">(33/21) </text:span> [ⲉⲩⲧ]ⲱ̣ⲟⲩⲛ ϩⲁ ⲛ̅ⲕⲁ ⲛⲓⲙ ϫⲉⲕⲁⲁⲥ ⲉⲩⲛⲁ‐ <text:line-break/><text:span text:style-name="T1"> </text:span><text:span text:style-name="T2">(33/22) </text:span> [ϫⲱⲕ ⲉⲃⲟ]ⲗ ⲙ̅ⲡⲁⲑⲗⲟⲛ ⲛ̅ⲥⲉⲣ̅ⲕⲗⲏⲣⲟⲛⲟ‐ <text:line-break/><text:span text:style-name="T1"> </text:span><text:span text:style-name="T2">(33/23) </text:span> [ⲙⲉⲓ ⲙ̅]ⲡ̣ⲱⲛϩ ⲛ̅ϣⲁ ⲁⲛⲏϩⲉ ⲁⲛⲟⲕ ⲇⲉ <text:line-break/><text:span text:style-name="T1"> </text:span><text:span text:style-name="T2">(33/24) </text:span> [ⲡⲉϫⲁⲓ] ⲛ̣ⲁϥ ϫⲉ ⲡϫⲟⲉⲓⲥ ⲛⲉⲧⲉ ⲙ̅ⲡⲟⲩ‐ <text:line-break/><text:span text:style-name="T1"> </text:span><text:span text:style-name="T2">(33/25) </text:span> [ⲉⲓⲣⲉ] ⲛⲁⲓ̈ ϩ̅ⲛ̅ ⲟⲩ ⲛⲉ ⲛⲉⲩⲯⲩⲭⲟⲟⲩⲉ <text:line-break/><text:span text:style-name="T1"> </text:span><text:span text:style-name="T2">(34/1) </text:span> ⲏ ⲉⲩⲛⲁⲭⲱⲣⲓ ⲉⲧⲱⲛ ⲛⲁⲓ̈ ⲛ̅ⲧⲁ ⲡⲉⲡⲛⲁ <text:line-break/><text:span text:style-name="T1"> </text:span><text:span text:style-name="T2">(34/2) </text:span> ⲙ̅ⲡⲱⲛϩ ⲉⲓ ⲉϩⲟⲩⲛ ⲉⲣⲟⲟⲩ ⲙ̅ⲛ̅ ⲧⲇⲩⲛⲁ‐ <text:line-break/><text:span text:style-name="T1"> </text:span><text:span text:style-name="T2">(34/3) </text:span> ⲙⲓⲥ ⲥⲉⲛⲁⲟⲩϫⲁⲓ̈ ϫ̅ⲛ̅ ⲙ̅ⲙⲟⲛ ⲡⲉϫⲁϥ <text:line-break/><text:span text:style-name="T1"> </text:span><text:span text:style-name="T2">(34/4) </text:span> ⲛⲁⲓ̈ ϫⲉ ⲛⲉⲛⲧⲁ ⲡ̅ⲛ̅ⲁ̅ ⲙ̅ⲡⲱⲛϩ ⲉⲓ ⲉϩⲟⲩⲛ <text:line-break/><text:span text:style-name="T1"> </text:span><text:span text:style-name="T2">(34/5) </text:span> ⲉⲣⲟⲟⲩ ⲡⲁⲛⲧⲏ ⲡⲁⲛⲧⲱⲥ ⲥⲉⲛⲁⲟⲩ‐ <text:line-break/><text:span text:style-name="T1"> </text:span><text:span text:style-name="T2">(34/6) </text:span> ϫⲁⲓ̈ ⲛⲁⲓ̈ ϣⲁⲩⲡⲱⲧ· ⲛ̅ⲧⲟⲟⲧ̅ⲥ̅ ⲛ̅ⲧⲕⲁⲕⲓⲁ <text:line-break/><text:span text:style-name="T1"> </text:span><text:span text:style-name="T2">(34/7) </text:span> ⲧⲇⲩⲛⲁⲙⲓⲥ ⲅⲁⲣ ϣⲁⲥⲉⲓ ⲉϩⲟⲩⲛ ⲉⲣⲱⲙⲉ <text:line-break/><text:span text:style-name="T1"> </text:span><text:span text:style-name="T2">(34/8) </text:span> ⲛⲓⲙ· ⲁϫⲛⲧ̅ⲥ̅ ⲅⲁⲣ ⲉⲙ̅ⲛ̅ϣϭⲟⲙ ⲉⲧ̣[ⲣⲉⲩ] <text:line-break/><text:span text:style-name="T1"> </text:span><text:span text:style-name="T2">(34/9) </text:span> ⲁϩⲉ ⲉⲣⲁⲧⲟⲩ ⲙ̅ⲛ̅ⲛ̅ⲥⲁ ⲉⲩϣⲁⲛϫⲡⲟ ⲙ‐ <text:line-break/><text:span text:style-name="T1"> </text:span><text:span text:style-name="T2">(34/10) </text:span> ⲡⲣⲱⲙⲉ ⲧⲟⲧⲉ ϣⲁⲩⲉⲓⲛⲉ ⲙ̅ⲡ[ⲉⲡ̅]ⲛ̣̅[ⲁ̅] <text:line-break/><text:span text:style-name="T1"> </text:span><text:span text:style-name="T2">(34/11) </text:span> ⲙ̅ⲡⲱⲛϩ ⲛ̅ⲛⲁⲛⲧⲓⲙⲓⲙⲟⲛ ⲙ̅ⲡ̅[ⲛ̅ⲁ̅ ⲉ]‐ <text:line-break/><text:span text:style-name="T1"> </text:span><text:span text:style-name="T2">(34/12) </text:span> ϣⲱⲡⲉ ⲙⲉⲛ ⲉⲡⲉⲡ̅ⲛ̅ⲁ̅ ⲙ̅ⲡⲱ̣ⲛ̣[ϩ ⲉⲓ ⲉⲡⲱⲛϩ] <text:line-break/><text:span text:style-name="T1"> </text:span><text:span text:style-name="T2">(34/13) </text:span> ⲉⲩϫⲱⲱⲣ ⲡⲉ ϣⲁϥ̣[ⲉⲓⲣⲉ ⲛ̅ⲧⲉⲯⲩⲭⲏ ⲛ̅]‐ <text:line-break/><text:span text:style-name="T1"> </text:span><text:span text:style-name="T2">(34/14) </text:span> ϫⲱⲱⲣ ⲉⲧⲉ ⲧⲇⲩⲛⲁⲙⲓ[ⲥ ⲧⲉ ⲁⲩⲱ ⲙⲉϥ]‐ <text:line-break/><text:span text:style-name="T1"> </text:span><text:span text:style-name="T2">(34/15) </text:span> ⲡⲗⲁⲛⲁ ⲙ̅ⲙⲟⲥ ⲉⲧⲡⲟⲛ̣ⲏ[ⲣⲓⲁ ⲡⲉⲧⲉⲣⲉ ⲡⲉ] <text:line-break/><text:span text:style-name="T1"> </text:span><text:span text:style-name="T2">(34/16) </text:span> ⲡ̅ⲛ̅ⲁ̅ ⲛ̅ⲁⲛⲧⲓⲙⲓⲙⲟⲛ ⲛ̣[ⲏⲩ ⲉϩⲟⲩⲛ] <text:line-break/><text:span text:style-name="T1"> </text:span><text:span text:style-name="T2">(34/17) </text:span> ⲉⲣⲟϥ ϣⲁⲩⲥⲱⲕ ⲙ̅ⲙⲟϥ ⲉ̣[ⲃⲟⲗ ϩⲓⲧⲟⲟⲧ̅ϥ̅] <text:line-break/><text:span text:style-name="T1"> </text:span><text:span text:style-name="T2">(34/18) </text:span> ⲁⲩⲱ ⲛ̅ⲥⲉⲡⲗⲁⲛⲁ· ⲁ[ⲛ]ⲟⲕ ⲇ[ⲉ ⲡⲉϫⲁⲓ̈] <text:line-break/><text:span text:style-name="T1"> </text:span><text:span text:style-name="T2">(34/19) </text:span> ϫⲉ ⲡϫⲟⲉⲓⲥ ⲛⲉⲯⲩⲭⲟⲟ[ⲩⲉ ⲛ̅ⲛⲁⲓ̈ ⲉⲩ]‐ <text:line-break/><text:span text:style-name="T1"> </text:span><text:span text:style-name="T2">(34/20) </text:span> ϣⲁⲛⲉⲓ ⲉⲃⲟⲗ ϩ̅ⲛ̅ ⲧⲥⲁⲣⲝ ⲉ̣[ⲩⲛⲁⲃⲱⲕ] <text:line-break/><text:span text:style-name="T1"> </text:span><text:span text:style-name="T2">(34/21) </text:span> ⲉⲧⲱⲛ· ⲛ̅ⲧⲟϥ ⲇⲉ ⲁϥⲥⲱⲃⲉ ⲡⲉ̣[ϫⲁϥ ϫⲉ] <text:line-break/><text:span text:style-name="T1"> </text:span><text:span text:style-name="T2">(34/22) </text:span> ⲧⲉⲯⲩⲭⲏ ⲉⲧⲉ ⲧϭⲟⲙ ⲧⲉ ⲉⲥϣⲁ[ⲛ ⲣ̅ϩⲟⲩⲟ] <text:line-break/><text:span text:style-name="T1"> </text:span><text:span text:style-name="T2">(34/23) </text:span> ⲉⲡⲉⲡ̅ⲛ̅ⲁ̅ ⲛ̅ⲁⲛⲧⲓⲙⲓⲙⲟⲛ ⲧ̣[ⲁⲓ̈ ⲅⲁⲣ ⲥ]‐ <text:line-break/><text:span text:style-name="T1"> </text:span><text:span text:style-name="T2">(34/24) </text:span> ϫⲱⲱⲣⲉ ⲧⲉ ϣⲁⲥⲡⲱⲧ ⲛ̅ⲧ̣[ⲟⲟⲧ̅ⲥ̅ ⲛ̅]‐ <text:line-break/><text:span text:style-name="T1"> </text:span><text:span text:style-name="T2">(34/25) </text:span> ⲧⲡⲟⲛⲏⲣⲓⲁ ⲁⲩⲱ ⲥⲉⲛⲁⲟ̣[ⲩϫⲁⲓ̈ ⲙ̅ⲙⲟⲥ] <text:line-break/><text:span text:style-name="T1"> </text:span><text:span text:style-name="T2">(34/26) </text:span> ⲉⲃⲟⲗ ϩⲓⲧⲟⲟⲧ̅ⲥ̅· ⲛ̅ⲧⲉⲡⲓⲥⲕⲟⲡ̣[ⲏ ⲛ̅ⲁ]‐ <text:line-break/><text:span text:style-name="T1"> </text:span><text:span text:style-name="T2">(35/1) </text:span> ⲫⲑⲁⲣⲧⲟⲛ ⲁⲩⲱ ⲛ̅ⲥⲉⲛ̅ⲧⲟⲩ ⲉⲧⲁⲛⲁⲡⲁⲩ‐ <text:line-break/><text:soft-page-break/><text:span text:style-name="T1"> </text:span><text:span text:style-name="T2">(35/2) </text:span> ⲥⲓⲥ ⲛ̅ⲁⲓⲱⲛ· ⲁⲛⲟⲕ ⲇⲉ ⲡⲉϫⲁⲓ̈ ϫⲉ ⲡϫⲟ‐ <text:line-break/><text:span text:style-name="T1"> </text:span><text:span text:style-name="T2">(35/3) </text:span> ⲉⲓⲥ ⲛⲉⲧⲉ ⲙ̅ⲡⲟⲩⲥⲟⲟⲩⲛ ⲉⲡⲧⲏⲣ̅ϥ̅ ϩ̅ⲛ̅ <text:line-break/><text:span text:style-name="T1"> </text:span><text:span text:style-name="T2">(35/4) </text:span> ⲟⲩ ⲛⲉ ⲛⲉⲩⲯⲩⲭⲟⲟⲩⲉ ⲏ ⲉⲩⲛⲁⲭⲱⲣⲓ <text:line-break/><text:span text:style-name="T1"> </text:span><text:span text:style-name="T2">(35/5) </text:span> ⲉⲧⲱⲛ ⲡⲉϫⲁϥ ⲛⲁⲓ̈ ϫⲉ ⲛ̅ⲧⲁϥϩⲣⲟϣ ⲉ‐ <text:line-break/><text:span text:style-name="T1"> </text:span><text:span text:style-name="T2">(35/6) </text:span> ϫⲱⲟⲩ ⲛ̅ϭⲓ ⲡⲉⲡ̅ⲛ̅ⲁ̅ ⲛ̅ⲁⲛⲧⲓⲙⲓⲙⲟⲛ <text:line-break/><text:span text:style-name="T1"> </text:span><text:span text:style-name="T2">(35/7) </text:span> ⲛ̅ⲧⲉⲣⲟⲩⲥⲫⲁⲗⲗⲉⲓ ⲛ̅ⲧⲉⲉⲓϩⲉ ⲁⲩⲃⲁⲣⲉⲓ <text:line-break/><text:span text:style-name="T1"> </text:span><text:span text:style-name="T2">(35/8) </text:span> [ⲛ̅ⲧ]ⲉ̣ⲩⲯⲩⲭⲏ ⲁⲩⲥⲱⲕ ⲙ̅ⲙⲟⲥ ⲉⲛⲉϩⲃⲏ‐ <text:line-break/><text:span text:style-name="T1"> </text:span><text:span text:style-name="T2">(35/9) </text:span> ⲩⲉ ⲛ̅ⲧⲡⲟⲛⲏⲣⲓⲁ ⲁⲩⲱ ⲁⲩⲉⲓⲛⲉ ⲙ̅ⲙⲟⲥ <text:line-break/><text:span text:style-name="T1"> </text:span><text:span text:style-name="T2">(35/10) </text:span> [ⲉⲧⲃ̅]ϣ̣ⲉ ⲁⲩⲱ ⲛ̅ⲧⲉⲉⲓϩⲉ ⲙ̅ⲛ̅ⲛ̅ⲥⲁ ⲧⲣⲉⲩ‐ <text:line-break/><text:span text:style-name="T1"> </text:span><text:span text:style-name="T2">(35/11) </text:span> [ⲕⲱ]ⲕ̣ ⲁϩⲏⲟⲩ ⲙ̅ⲡⲥⲱⲙⲁ ϣⲁⲩⲧⲁⲁⲩ <text:line-break/><text:span text:style-name="T1"> </text:span><text:span text:style-name="T2">(35/12) </text:span> [ⲉⲧⲟⲟⲧ]ⲩ̣ ⲛ̅ⲛⲉⲝⲟⲩⲥⲓⲁ ⲛⲁⲓ̈ ⲛ̅ⲧⲁⲩϣⲱ‐ <text:line-break/><text:span text:style-name="T1"> </text:span><text:span text:style-name="T2">(35/13) </text:span> [ⲡⲉ ⲉⲃⲟⲗ ϩⲓⲧⲟ]ⲟ̣ⲧ̅ϥ̅ ⲙ̅ⲡⲁⲣⲭⲱⲛ· ⲡⲁⲗⲓⲛ <text:line-break/><text:span text:style-name="T1"> </text:span><text:span text:style-name="T2">(35/14) </text:span> [ⲛ̅ⲥⲉⲛⲟⲩϫⲉ ⲙ̅ⲙ]ⲟⲟⲩ ⲉϩ̅ⲛ̅ⲕⲉⲙⲉⲣⲟⲥ ⲁⲩ‐ <text:line-break/><text:span text:style-name="T1"> </text:span><text:span text:style-name="T2">(35/15) </text:span> [ⲱ ϣⲁⲩⲕⲱⲧⲉ] ⲛ̣̅̅ⲙ̅ⲙⲁⲩ ϣⲁⲛⲧⲟⲩⲛⲟ‐ <text:line-break/><text:span text:style-name="T1"> </text:span><text:span text:style-name="T2">(35/16) </text:span> [ⲩϩ̅ⲙ̅ ⲙ̅ⲙⲟⲟⲩ ϩⲓⲧ]ⲛ̅ ⲧⲡⲟⲛⲏⲣⲓⲁ ⲙ̅ⲛ̅ ⲧ̅ⲃ̅‐ <text:line-break/><text:span text:style-name="T1"> </text:span><text:span text:style-name="T2">(35/17) </text:span> [ϣⲉ ⲁⲩⲱ ⲛ̅ⲥ̅ϫⲓ ⲛ̅ⲟⲩ]ⲥ̣ⲟⲟⲩⲛ ⲛ̅ⲧⲉⲉⲓϩⲉ <text:line-break/><text:span text:style-name="T1"> </text:span><text:span text:style-name="T2">(35/18) </text:span> [ⲉⲥϣⲁⲛϫⲱⲕ ϣⲁⲥ]ⲟⲩϫⲁⲓ̈· ⲁⲛⲟⲕ ⲇⲉ ⲡⲉ‐ <text:line-break/><text:span text:style-name="T1"> </text:span><text:span text:style-name="T2">(35/19) </text:span> [ϫⲁⲓ̈ ⲛⲁϥ ϫ]ⲉ̣ [ⲡ]ϫⲟⲉⲓⲥ ⲁⲩⲱ ⲛ̅ⲁϣ ⲛ̅ϩⲉ‐ <text:line-break/><text:span text:style-name="T1"> </text:span><text:span text:style-name="T2">(35/20) </text:span> [ϣⲁⲥⲡⲁ]ⲕⲉ ⲛ̅ϭⲓ ⲧⲉⲯⲩⲭⲏ ⲡⲁⲗⲓⲛ ⲛ̅‐ <text:line-break/><text:span text:style-name="T1"> </text:span><text:span text:style-name="T2">(35/21) </text:span> [ⲥⲃⲱⲕ ⲉ]ⲕϩ̣ⲟⲩⲛ ⲉⲧⲉⲫⲩⲥⲓⲥ ⲛ̅ⲧⲙⲁⲁⲩ ⲏ ⲉ‐ <text:line-break/><text:span text:style-name="T1"> </text:span><text:span text:style-name="T2">(35/22) </text:span> [ϩⲟⲩⲛ ⲉ]ⲡ̣ⲣⲱⲙⲉ ⲛ̅ⲧⲟϥ ⲇⲉ ⲁϥ·ⲣⲁϣⲉ <text:line-break/><text:span text:style-name="T1"> </text:span><text:span text:style-name="T2">(35/23) </text:span> [ⲛ̅ⲧⲁⲣⲓ]ϣ̣ⲓⲛⲉ ⲙ̅ⲙⲟϥ ⲡⲉϫⲁϥ ⲛⲁⲓ̈ ϫⲉ <text:line-break/><text:span text:style-name="T1"> </text:span><text:span text:style-name="T2">(35/24) </text:span> [ⲛ̅ⲧⲕ ⲟⲩ]ⲙⲁⲕⲁⲣⲓⲟⲥ ϩ̅ⲙ̅ ⲡⲉⲛⲧⲁⲕⲟⲩⲁ <text:line-break/><text:span text:style-name="T1"> </text:span><text:span text:style-name="T2">(35/25) </text:span> [ϩⲕ ⲛ̅ⲥ]ⲱϥ ϣⲁⲩⲧⲁⲁⲥ ⲙⲉⲛ ⲛ̅ⲕⲉⲟⲩⲁ· <text:line-break/><text:span text:style-name="T1"> </text:span><text:span text:style-name="T2">(36/1) </text:span> ⲙ̅ⲡⲙⲁ ⲙ̅ⲡⲉⲡ̅ⲛ̅ⲁ̅ ⲙ̅ⲡⲱⲛϩ ⲛ̅ⲥ̅ⲁⲕⲟ‐ <text:line-break/><text:span text:style-name="T1"> </text:span><text:span text:style-name="T2">(36/2) </text:span> ⲗⲟⲩⲑⲓ ⲛⲁϥ ⲛ̅ⲥⲥⲱⲧ̅ⲙ̅ ⲉⲃⲟⲗ ϩⲓⲧⲟⲟⲧ̅ϥ̅ <text:line-break/><text:span text:style-name="T1"> </text:span><text:span text:style-name="T2">(36/3) </text:span> ⲛ̅ⲥ̅ⲟⲩϫⲁⲓ̈ ϣⲁⲩⲉⲓ ϭⲉ ⲁⲛ ⲉϩⲟⲩⲛ ⲉⲥⲁⲣⲝ· <text:line-break/><text:span text:style-name="T1"> </text:span><text:span text:style-name="T2">(36/4) </text:span> ϫ̅ⲛ̅ ⲛ̅ⲧⲉⲛⲟⲩ· ⲁⲛⲟⲕ ⲇⲉ ⲡⲉϫⲁⲓ̈ ϫⲉ <text:line-break/><text:span text:style-name="T1"> </text:span><text:span text:style-name="T2">(36/5) </text:span> ⲡϫⲟⲉⲓⲥ· ⲛⲁⲓ̈ ⲉⲣⲥⲟⲟⲩⲛ ⲉⲁⲩⲕⲁⲧⲟⲩ <text:line-break/><text:span text:style-name="T1"> </text:span><text:span text:style-name="T2">(36/6) </text:span> ⲉⲡⲁϩⲟⲩ ϩ̅ⲛ̅ ⲟⲩ ⲛⲉ ⲛⲉⲩⲯⲩⲭⲟⲟⲩⲉ ⲏ <text:line-break/><text:span text:style-name="T1"> </text:span><text:span text:style-name="T2">(36/7) </text:span> ⲉⲩⲛⲁⲭⲱⲣⲓ ⲉⲧⲱⲛ ⲡⲉϫⲁϥ ⲛⲁⲓ̈ ϫⲉ <text:line-break/><text:span text:style-name="T1"> </text:span><text:span text:style-name="T2">(36/8) </text:span> ⲡⲙⲁ ⲉⲧⲥⲛⲁⲭⲱⲣⲓ ⲉⲣⲟϥ ⲛ̅ϭⲓ ⲛ̅ⲁ̣[ⲅⲅⲉ]‐ <text:line-break/><text:span text:style-name="T1"> </text:span><text:span text:style-name="T2">(36/9) </text:span> ⲗⲟⲥ ⲛ̅ⲧⲙ̅ⲛ̅ⲧ̅ϩⲏⲕⲉ ⲛⲁⲓ̈ ⲉⲧⲉ ⲙ̅ⲡⲉ ⲙⲉ‐ <text:line-break/><text:span text:style-name="T1"> </text:span><text:span text:style-name="T2">(36/10) </text:span> ⲧⲁⲛⲟⲓⲁ ⲉⲓ ⲛⲁⲩ ⲁⲩⲱ ⲛ̅ⲥⲉⲁⲣⲏϩ ⲉ̣[ⲣⲟⲟⲩ] <text:line-break/><text:span text:style-name="T1"> </text:span><text:span text:style-name="T2">(36/11) </text:span> ⲉⲡⲓϩⲟⲟⲩ ⲉⲧ̅ⲙ̅ⲙⲁⲩ ⲉⲧ̅ⲥ̅ⲛⲁⲕⲟ̣[ⲗⲁⲍⲉ] <text:line-break/><text:span text:style-name="T1"> </text:span><text:span text:style-name="T2">(36/12) </text:span> ⲛ̅ϩⲣⲁⲓ̈ ⲛ̅ϩⲏⲧⲟⲩ ⲟⲩⲟⲛ ⲛ̣ⲓⲙ [ⲛ̅ⲧⲁϥϫⲉ] <text:line-break/><text:span text:style-name="T1"> </text:span><text:span text:style-name="T2">(36/13) </text:span> ⲉⲡϩⲁⲅⲓⲟⲛ ⲛ̅ⲡ̅ⲛ̅ⲁ̅ [ϩ̅ⲛ̅ ⲟⲩ̣[ⲃⲁⲥⲁⲛⲟⲥ ⲛ̅ϣⲁ] <text:line-break/><text:span text:style-name="T1"> </text:span><text:span text:style-name="T2">(36/14) </text:span> ⲁⲛⲉϩ]· ⲉⲩⲃⲁⲥⲁⲛⲓⲍⲉ ⲙ̅ⲙ̣[ⲟⲟⲩ ϩ̅ⲛ̅ ⲟⲩ]‐ <text:line-break/><text:span text:style-name="T1"> </text:span><text:span text:style-name="T2">(36/15) </text:span> ⲃⲁⲥⲁⲛⲟⲥ ⲛ̅ϣⲁ ⲉⲛⲉ[ϩ ⲁⲛⲟⲕ ⲇⲉ ⲡⲉ]‐ <text:line-break/><text:span text:style-name="T1"> </text:span><text:span text:style-name="T2">(36/16) </text:span> ϫⲁⲓ̈ ϫⲉ ⲡϫⲟⲉⲓⲥ ⲛ̅ⲧⲁϥ̣[ⲉⲓ ⲉⲧⲱⲛ ⲛ̅ϭⲓ] <text:line-break/><text:span text:style-name="T1"> </text:span><text:span text:style-name="T2">(36/17) </text:span> ⲡⲁⲛⲧⲓⲙⲓⲙⲟⲛ ⲙ̅ⲡ̣̅̅[ⲛ̅ⲁ̅ ⲧⲟⲧⲉ ⲛ̅ⲧⲟϥ ⲡⲉ]‐ <text:line-break/><text:span text:style-name="T1"> </text:span><text:span text:style-name="T2">(36/18) </text:span> ϫⲁϥ ϫⲉ ⲛ̅ⲧⲁⲣⲭⲏ ⲛ̅ⲧ̣[ ] <text:line-break/><text:span text:style-name="T1"> </text:span><text:span text:style-name="T2">(36/19) </text:span> ⲛ̅ⲧⲉⲣⲓⲛⲁⲩ ϩ̅ⲙ̅ ⲡⲉⲡ̅ⲛ̣̅[ⲁ̅] ⲙ̣[ ⲉ]‐ <text:line-break/><text:span text:style-name="T1"> </text:span><text:span text:style-name="T2">(36/20) </text:span> ϩⲟⲩⲛ ⲉϩ̅ⲛ̅ ⲧⲉⲧⲛⲁϣⲉ ⲡⲉⲥⲉⲓ̣[ ⲙ̅ⲛ̅ ⲡⲉ]‐ <text:line-break/><text:span text:style-name="T1"> </text:span><text:span text:style-name="T2">(36/21) </text:span> ⲡ̅ⲛ̅ⲁ̅ ⲉⲧⲟⲩⲁⲁⲃ ⲡⲉⲛⲧⲁϥϩⲓⲥⲉ̣ [ⲛ̅ⲙ̅ⲙⲁⲛ]‐ <text:line-break/><text:span text:style-name="T1"> </text:span><text:span text:style-name="T2">(36/22) </text:span> ⲉⲧⲉ ⲧⲉⲡⲓⲛⲟⲓⲁ ⲙ̅ⲡⲟⲩⲟⲉⲓⲛ ⲧ[ⲉ ⲉⲥϣⲟ]‐ <text:line-break/><text:span text:style-name="T1"> </text:span><text:span text:style-name="T2">(36/23) </text:span> ⲟⲡ· ⲙ̅ⲛ̅ ⲡⲉⲥⲡⲉⲣⲙⲁ ⲁⲥⲧⲟⲩ[ⲛⲟⲥ̅ϥ̅ ⲙ̅]‐ <text:line-break/><text:soft-page-break/><text:span text:style-name="T1"> </text:span><text:span text:style-name="T2">(36/24) </text:span> ⲡⲙⲉⲉⲩⲉ ⲛ̅ⲛ̅ⲣⲱⲙⲉ ⲛ̅ⲧ[ⲅⲉⲛⲉⲁ ⲉ]‐ <text:line-break/><text:span text:style-name="T1"> </text:span><text:span text:style-name="T2">(36/25) </text:span> ⲧⲉ ⲙⲉⲥⲕⲓⲙ ⲛ̅ⲧⲉ ⲡⲧⲉⲗⲓⲟ̣ⲥ̣ [ⲛ̅ⲟⲩⲟⲉⲓⲛ] <text:line-break/><text:span text:style-name="T1"> </text:span><text:span text:style-name="T2">(37/1) </text:span> [ⲛ̅ⲣⲱ]ⲙ̣ⲉ̣ ⲁϥⲉⲓⲙⲉ ϭⲉ ⲛ̅ϭⲓ ⲡⲉ‐ <text:line-break/><text:span text:style-name="T1"> </text:span><text:span text:style-name="T2">(37/2) </text:span> [ϩ]ⲟ̣ⲩ̣ⲉ̣ⲓ̣ⲧ ⲛ̅ⲁⲣⲭⲱⲛ ϫⲉ ⲥⲉⲟⲩⲟⲧ̅ⲃ̅ ⲉⲣⲟϥ <text:line-break/><text:span text:style-name="T1"> </text:span><text:span text:style-name="T2">(37/3) </text:span> [ϩ̅]ⲙ̅ ⲡϫⲓⲥⲉ ⲛ̅ⲧⲉⲩⲙ̅ⲛ̅ⲧ̅ⲥⲁⲃⲉ ⲁⲩⲱ ⲁϥ‐ <text:line-break/><text:span text:style-name="T1"> </text:span><text:span text:style-name="T2">(37/4) </text:span> [ⲣ̅]ϩⲛⲁϥ ⲛ̅ⲉⲙⲁϩⲧⲉ ⲙ̅ⲡⲉⲩϣⲁϫⲛⲉ <text:line-break/><text:span text:style-name="T1"> </text:span><text:span text:style-name="T2">(37/5) </text:span> [ⲉ]ϥ̣[ⲟ] ⲛ̣̅ⲁⲧⲥⲟⲟⲩⲛ ⲉⲛϥ̅ⲥⲟⲟⲩⲛ ⲁⲛ ϫⲉ‐ <text:line-break/><text:span text:style-name="T1"> </text:span><text:span text:style-name="T2">(37/6) </text:span> [ⲥⲉⲟ] ⲛ̅ⲥⲁⲃⲉ ⲛ̅ϩⲟⲩⲟ ⲉⲣⲟϥ ⲁϥⲉⲓⲣⲉ ⲛ̅‐ <text:line-break/><text:span text:style-name="T1"> </text:span><text:span text:style-name="T2">(37/7) </text:span> [ⲟⲩ]ϣⲁϫⲛⲉ ⲁϥϫⲡⲟ ⲛ̅ⲑⲓⲙⲁⲣⲙⲉⲛⲏ <text:line-break/><text:span text:style-name="T1"> </text:span><text:span text:style-name="T2">(37/8) </text:span> [ⲁϥⲙ]ⲟ̣ⲩⲣ ϩ̅ⲛ̅ ϩ̅ⲛ̅ϣⲓ ⲙ̅ⲛ̅ ϩⲉⲛⲭⲣⲟⲛⲟⲥ <text:line-break/><text:span text:style-name="T1"> </text:span><text:span text:style-name="T2">(37/9) </text:span> [ⲙ̅ⲛ̅] ϩ̣ⲉⲛⲕⲁⲓⲣⲟⲥ ⲛ̅ⲛ̅ⲛⲟⲩⲧⲉ ⲛ̅ⲙ̅ⲡⲏ‐ <text:line-break/><text:span text:style-name="T1"> </text:span><text:span text:style-name="T2">(37/10) </text:span> [ⲩⲉ] ⲙ̣̅̅ⲛ̅ ⲛ̅ⲁⲅ·ⲅⲉⲗⲟⲥ ⲙ̅ⲛ̅ ⲛ̅ⲇⲁⲓⲙⲱⲛ <text:line-break/><text:span text:style-name="T1"> </text:span><text:span text:style-name="T2">(37/11) </text:span> [ⲙ̅ⲛ̅ ⲛ̅]ⲣ̣ⲱⲙⲉ ϫⲉⲕⲁⲁⲥ ⲉⲣⲉ ⲟⲩⲟⲛ ⲛⲓⲙ <text:line-break/><text:span text:style-name="T1"> </text:span><text:span text:style-name="T2">(37/12) </text:span> [ϣⲱⲡⲉ] ϩ̣̅̅ⲛ̣̅̅ [ⲧ]ⲉ̣ⲥ̣ⲙ̅ⲣ̅ⲣⲉ ⲁⲩⲱ ⲛ̅ⲥⲉⲣϫⲟ‐ <text:line-break/><text:span text:style-name="T1"> </text:span><text:span text:style-name="T2">(37/13) </text:span> [ⲉⲓⲥ ⲉⲟⲩⲟⲛ ⲛⲓⲙ] ⲟ̣ⲩⲙⲉⲟⲩⲉ ⲉϥϭⲁⲁⲙⲉ <text:line-break/><text:span text:style-name="T1"> </text:span><text:span text:style-name="T2">(37/14) </text:span> [ⲁⲩⲱ ⲉϥϩⲟⲟⲩ] ⲁ̣ⲩⲱ ⲁϥⲣ̅ϩⲧⲏϥ ⲉ‐ <text:line-break/><text:span text:style-name="T1"> </text:span><text:span text:style-name="T2">(37/15) </text:span> [ϫ̅ⲛ̅ ϩⲃⲏⲩⲉ ⲧⲏⲣⲟⲩ] ⲛ̣̅ⲧⲁⲩϣⲱⲡⲉ· ⲉⲃⲟⲗ <text:line-break/><text:span text:style-name="T1"> </text:span><text:span text:style-name="T2">(37/16) </text:span> [ϩⲓⲧⲟⲟⲧ̅ϥ̅ ⲁϥϣⲟ]ϫ̣ⲛⲉ ⲉⲧⲁⲙⲓⲟ ⲛ̅ⲟⲩ‐ <text:line-break/><text:span text:style-name="T1"> </text:span><text:span text:style-name="T2">(37/17) </text:span> [ⲕⲁⲧⲁⲕⲗⲩⲥⲙⲟⲥ ⲉϩ]ⲣ̣ⲁⲓ̣̈ ⲉϫ̅ⲙ̅ ⲡⲁⲛⲁ‐ <text:line-break/><text:span text:style-name="T1"> </text:span><text:span text:style-name="T2">(37/18) </text:span> [ⲥⲧⲉⲙⲁ ⲧⲏⲣ̅ϥ̅ ⲙ̅]ⲡ̣ⲣⲱⲙⲉ· ⲁⲩⲱ ϯⲙ̅ⲛ̅‐ <text:line-break/><text:span text:style-name="T1"> </text:span><text:span text:style-name="T2">(37/19) </text:span> [ⲧⲛⲟϭ ⲙ̅ⲡⲣ]ⲟⲛⲟⲓⲁ ⲁⲥⲣ̅ⲡⲙⲉⲉⲩⲉ ⲉ‐ <text:line-break/><text:span text:style-name="T1"> </text:span><text:span text:style-name="T2">(37/20) </text:span> [ⲧⲉ ⲧⲉⲡⲓⲛⲟⲓ]ⲁ̣ ⲧⲉ ⲁⲥⲟⲩⲱⲛϩ ⲉⲃⲟⲗ ⲛ̅‐ <text:line-break/><text:span text:style-name="T1"> </text:span><text:span text:style-name="T2">(37/21) </text:span> [ⲛⲱϩⲉ ⲁϥⲕⲏ]ⲣ̣ⲩⲥⲥⲉ ⲛ̅ⲛ̅ⲣⲱⲙⲉ ⲙ̅ⲡⲟⲩ‐ <text:line-break/><text:span text:style-name="T1"> </text:span><text:span text:style-name="T2">(37/22) </text:span> [ⲡⲓⲥⲧⲉⲩⲉ] ⲛ̣ⲁϥ· ⲕⲁⲧⲁ ⲑⲉ ⲁⲛ ⲛ̅ⲧⲁϥ ϫⲟⲟⲥ <text:line-break/><text:span text:style-name="T1"> </text:span><text:span text:style-name="T2">(37/23) </text:span> [ⲛ̅ϭⲓ ⲙⲱ]ⲩⲥⲏⲥ ϫⲉ ⲁⲩϩⲁⲡⲟⲩ ϩ̅ⲛ̅ ⲟⲩⲕⲓ‐ <text:line-break/><text:span text:style-name="T1"> </text:span><text:span text:style-name="T2">(37/24) </text:span> [ⲃⲱⲧⲟⲥ] ⲁⲗⲗⲁ ⲛ̅ⲧⲁⲩⲥⲕⲉⲡⲁⲍⲉ ⲙ̅ⲙⲟⲟⲩ <text:line-break/><text:span text:style-name="T1"> </text:span><text:span text:style-name="T2">(38/1) </text:span> ϩ̅ⲛ̅ ⲟⲩⲧⲟⲡⲟⲥ ⲟⲩ ⲙⲟⲛ[ⲟⲛ ⲛⲱϩⲉ ⲟⲩ]‐ <text:line-break/><text:span text:style-name="T1"> </text:span><text:span text:style-name="T2">(38/2) </text:span> ⲁⲁⲧϥ· ⲁⲗⲗⲁ ϩⲉⲛⲕⲉⲣⲱⲙⲉ ⲛⲧ̣ⲉ̣ ⲧ̣ⲅ̣ⲉ̣‐ <text:line-break/><text:span text:style-name="T1"> </text:span><text:span text:style-name="T2">(38/3) </text:span> ⲛⲉⲁ ⲉⲧⲉ ⲙⲉⲥⲕⲓⲙ· ⲁⲩⲉⲓ ⲉϩⲟⲩⲛ ⲉⲩ̣‐ <text:line-break/><text:span text:style-name="T1"> </text:span><text:span text:style-name="T2">(38/4) </text:span> ⲧⲟⲡⲟⲥ ⲁⲩⲱ ⲁⲩⲥⲕⲉⲡⲁⲍⲉ ⲙ̅ⲙⲟⲟⲩ <text:line-break/><text:span text:style-name="T1"> </text:span><text:span text:style-name="T2">(38/5) </text:span> ϩⲓⲧⲛ̅ ⲟⲩⲕⲏⲡⲉ ⲛ̅ⲟⲩⲟⲉⲓⲛ ⲁⲩⲱ ⲁ̣ⲩ‐ <text:line-break/><text:span text:style-name="T1"> </text:span><text:span text:style-name="T2">(38/6) </text:span> ⲥⲟⲩⲛ̅ ⲧⲙ̅ⲛ̅ⲧ̅ϫⲟⲉⲓⲥ ⲙ̅ⲡⲥⲁ ⲛϩⲣⲉ [ⲁⲩ]‐ <text:line-break/><text:span text:style-name="T1"> </text:span><text:span text:style-name="T2">(38/7) </text:span> ⲱ ⲙ̅ⲛ̅ ⲛⲉⲧ̅ⲛ̅ⲉⲙⲁϥ ⲉⲣⲉ ⲡⲟⲩⲟⲉⲓ̣[ⲛ] <text:line-break/><text:span text:style-name="T1"> </text:span><text:span text:style-name="T2">(38/8) </text:span> ⲣ̅ⲟⲩⲟⲉⲓⲛ ⲉⲣⲟⲟⲩ ⲉⲃⲟⲗ ϫⲉ ⲛⲉ ⲟⲩⲕ̣[ⲁⲕⲉ] <text:line-break/><text:span text:style-name="T1"> </text:span><text:span text:style-name="T2">(38/9) </text:span> ⲡⲉⲧⲉ ⲛⲉϥⲡⲁϩⲧ· ⲉϫ̅ⲛ̅ ⲟⲩⲟⲛ ⲛ[ⲓⲙ] <text:line-break/><text:span text:style-name="T1"> </text:span><text:span text:style-name="T2">(38/10) </text:span> ⲉⲧϩⲓϫ̅ⲙ̅ ⲡⲕⲁϩ· ⲁϥⲉⲓⲣⲉ ⲛ̅ⲟⲩϣⲁ̣[ϫⲛⲉ] <text:line-break/><text:span text:style-name="T1"> </text:span><text:span text:style-name="T2">(38/11) </text:span> ⲙ̅ⲛ̅ ⲛⲉϥⲁⲅ·ⲅⲉⲗⲟⲥ ⲁϥⲧ̅ⲛ̅ⲛⲟⲟ̣[ⲩ ⲛ̅]‐ <text:line-break/><text:span text:style-name="T1"> </text:span><text:span text:style-name="T2">(38/12) </text:span> ⲛⲉϥⲁⲅ·ⲅⲉⲗⲟⲥ ⲉⲣⲁⲧⲟⲩ ⲛ̅ⲛϣ[ⲉⲉⲣⲉ] <text:line-break/><text:span text:style-name="T1"> </text:span><text:span text:style-name="T2">(38/13) </text:span> ⲛ̅ⲛ̅ⲣⲱⲙⲉ ϫⲉⲕⲁⲁⲥ [ⲉⲩⲉⲧⲟⲩⲛⲟⲩⲥ ⲛ̅]‐ <text:line-break/><text:span text:style-name="T1"> </text:span><text:span text:style-name="T2">(38/14) </text:span> ⲟⲩⲥⲡⲉⲣⲙⲁ ⲉⲃⲟⲗ ⲛ̅ϩⲏ̣[ⲧⲟⲩ ⲉⲩⲙⲟ]‐ <text:line-break/><text:span text:style-name="T1"> </text:span><text:span text:style-name="T2">(38/15) </text:span> ⲧⲛⲉⲥ ⲛⲉⲩ· ⲁⲩⲱ ⲙ̣̅[ⲡⲟⲩϯ ⲙⲁⲧⲉ ϩ̅ⲙ̅] <text:line-break/><text:span text:style-name="T1"> </text:span><text:span text:style-name="T2">(38/16) </text:span> ⲡϣⲟⲣⲡ· ⲛ̅ⲥⲟⲡ ⲁⲩⲱ̣ [ⲛ̅ⲧⲁⲣⲟⲩⲉⲓⲙⲉ ϫⲉ ⲧ̅ⲙ̅ϯ]‐ <text:line-break/><text:span text:style-name="T1"> </text:span><text:span text:style-name="T2">(38/17) </text:span> ⲙⲁⲧⲉ· ⲁⲩϣⲁϫ[ⲛⲉ ⲧⲏⲣⲟⲩ ⲙ̅ⲛ̅ ⲛⲉⲩ ⲉⲣⲏⲩ]‐ <text:line-break/><text:span text:style-name="T1"> </text:span><text:span text:style-name="T2">(38/18) </text:span> ⲉⲧⲣⲉⲩⲧⲁⲙⲓⲟ̣ [ⲙ̅ⲡⲉⲡ̅ⲛ̅ⲁ̅ ⲛ̅ⲁⲛⲧⲓⲙⲓ]‐ <text:line-break/><text:span text:style-name="T1"> </text:span><text:span text:style-name="T2">(38/19) </text:span> ⲙⲟⲛ ϩ̅ⲛ̅ ⲟⲩⲙⲓⲙⲏ̣[ⲥⲓⲥ ⲙ̅ⲡⲉⲡ̅ⲛⲁ̅ ⲉ]‐ <text:line-break/><text:span text:style-name="T1"> </text:span><text:span text:style-name="T2">(38/20) </text:span> ⲣⲉⲓ ⲉⲡⲓⲥⲏⲧ· ⲁⲩⲙⲉ[ⲧⲁⲃⲁⲗⲗⲉ] <text:line-break/><text:span text:style-name="T1"> </text:span><text:span text:style-name="T2">(38/21) </text:span> ⲙ̅ⲙⲟⲟⲩ ⲛ̅ϭⲓ ⲛⲉⲩ̣[ⲁⲅⲅⲉⲗⲟⲥ ⲕⲁⲧⲁ] <text:line-break/><text:soft-page-break/><text:span text:style-name="T1"> </text:span><text:span text:style-name="T2">(38/22) </text:span> ⲡⲓⲛⲉ ⲛ̅ⲛⲉⲩϩⲟⲟⲩⲧ̣ [ⲉⲩⲙⲟⲩϩ ⲙ̅]‐ <text:line-break/><text:span text:style-name="T1"> </text:span><text:span text:style-name="T2">(38/23) </text:span> ⲙⲟⲟⲩ ⲙ̅ⲡⲉⲡ̅ⲛ̅ⲁ̅ ⲉⲧⲛ̅ϩ̣[ⲏⲧⲟⲩ ⲉⲧⲉ ⲡⲉ]‐ <text:line-break/><text:span text:style-name="T1"> </text:span><text:span text:style-name="T2">(38/24) </text:span> ⲙⲉϩ ⲛ̅ⲕⲁⲕⲉ ⲉⲃⲟⲗ ϩ̅ⲛ̅ ⲧ[ⲡⲟⲛⲏⲣⲓⲁ] <text:line-break/><text:span text:style-name="T1"> </text:span><text:span text:style-name="T2">(38/25) </text:span> ⲁⲩⲉⲓⲛⲉ ⲛⲁⲩ ⲛ̅ⲟⲩⲛⲟⲩⲃ ⲙ̣̅[ⲛ̅ ⲟⲩ]‐ <text:line-break/><text:span text:style-name="T1"> </text:span><text:span text:style-name="T2">(38/26) </text:span> ϩⲁⲧ· ⲙ̅ⲛ̅ ϩⲉⲛⲇⲱⲣⲟⲛ ⲙ̅ⲛ̅ ϩⲉ̣[ⲛϩⲟⲙⲧ] <text:line-break/><text:span text:style-name="T1"> </text:span><text:span text:style-name="T2">(39/1) </text:span> [ⲙ̅ⲛ̅ ϩⲱⲃ] ⲙ̣̅ⲛ̣ ⲙⲉⲧⲁⲗⲗⲟⲥ ⲙ̅ⲡⲃⲉⲛⲓ‐ <text:line-break/><text:span text:style-name="T1"> </text:span><text:span text:style-name="T2">(39/2) </text:span> [ⲡⲉ] ⲙ̣̅̅ⲛ̅ ⲉⲓⲇⲟⲥ ⲛⲓⲙ ⲛ̅ⲅⲉⲛⲟⲥ ⲁⲩⲱ ⲁⲩ‐ <text:line-break/><text:span text:style-name="T1"> </text:span><text:span text:style-name="T2">(39/3) </text:span> [ⲥ]ⲱⲕ ⲙ̅ⲙⲟⲟⲩ ⲉϩ̅ⲛ̅ⲡⲉⲣⲓⲥⲡⲁⲥⲙⲟⲥ <text:line-break/><text:span text:style-name="T1"> </text:span><text:span text:style-name="T2">(39/4) </text:span> [ⲉ]ⲧ̣̅̅ⲙ̅ⲧⲉⲩⲣ̅ⲡⲙⲉⲉⲩⲉ ⲛ̅ⲧⲉⲩⲡⲣⲟⲛⲟⲓⲁ <text:line-break/><text:span text:style-name="T1"> </text:span><text:span text:style-name="T2">(39/5) </text:span> [ⲉⲧⲉ] ⲙ̣ⲉⲥⲕⲓⲙ· ⲁⲩⲱ ⲁⲩⲉⲙⲁϩⲧⲉ ⲙ̅ⲙⲟ‐ <text:line-break/><text:span text:style-name="T1"> </text:span><text:span text:style-name="T2">(39/6) </text:span> [ⲟⲩ ⲁ]ⲩ̣ϫ̣ⲡⲟ ⲛ̅ϩⲉⲛϣⲏⲣⲉ ⲉⲃⲟⲗ ϩ̅ⲙ̅ <text:line-break/><text:span text:style-name="T1"> </text:span><text:span text:style-name="T2">(39/7) </text:span> [ⲡⲕ]ⲁ̣ⲕⲉ ⲉⲃⲟⲗ ϩ̅ⲙ̅ ⲡⲉⲩⲁⲛⲧⲓⲙⲓⲙⲟⲛ <text:line-break/><text:span text:style-name="T1"> </text:span><text:span text:style-name="T2">(39/8) </text:span> [ⲙ̅ⲡ̅]ⲛ̣̅̅ⲁ̅· ⲁⲩⲱ ⲁⲩⲧⲱⲙ ⲛ̅ⲛⲉⲩϩⲏⲧ· <text:line-break/><text:span text:style-name="T1"> </text:span><text:span text:style-name="T2">(39/9) </text:span> [ⲁ]ⲩ̣ⲛϣⲟⲧ ⲉⲃⲟⲗ ϩ̅ⲙ̅ ⲡⲉⲛϣⲟⲧ· ⲙ̅‐ <text:line-break/><text:span text:style-name="T1"> </text:span><text:span text:style-name="T2">(39/10) </text:span> ⲡ̣ⲁⲛⲧⲓⲙⲓⲙⲟⲛ ⲙ̅ⲡ̅ⲛ̅ⲁ̅ ϣⲁϩⲣⲁⲓ̈ ⲉ‐ <text:line-break/><text:span text:style-name="T1"> </text:span><text:span text:style-name="T2">(39/11) </text:span> [ⲧⲉⲛ]ⲟ̣ⲩ· ⲧⲙⲁⲕⲁⲣⲓⲟⲥ ⲟⲩⲛ ⲙ̅ⲙⲁⲁⲩ <text:line-break/><text:span text:style-name="T1"> </text:span><text:span text:style-name="T2">(39/12) </text:span> [ⲛ̅ⲉⲓⲱ]ⲧ̣· ⲧⲉ̣ⲧ̣ⲉ ⲛⲁϣⲉ ⲡⲉⲥⲛⲁⲉ ⲛⲁⲥ ⲉ‐ <text:line-break/><text:span text:style-name="T1"> </text:span><text:span text:style-name="T2">(39/13) </text:span> [ϫⲓ ⲙⲟ]ⲣⲫ̣[ⲏ] ⲙ̅ⲛ̅ ⲡⲉⲥⲥⲡⲉⲣⲙⲁ ⲛ̅ϣⲟ‐ <text:line-break/><text:span text:style-name="T1"> </text:span><text:span text:style-name="T2">(39/14) </text:span> [ⲣⲡ ⲁⲓⲉⲓ ⲉϩⲣⲁⲓ̈] ⲉⲡⲧⲉⲗⲉⲓⲟⲛ ⲛ̅ⲁⲓⲱⲛ· ⲁ‐ <text:line-break/><text:span text:style-name="T1"> </text:span><text:span text:style-name="T2">(39/15) </text:span> [ⲛⲟⲕ ⲇⲉ ⲉⲓϫⲱ ⲛ̅ⲛⲁⲓ̈]· ⲉⲣⲟⲕ ϫⲉ ⲉⲕⲛⲁⲥⲁ‐ <text:line-break/><text:span text:style-name="T1"> </text:span><text:span text:style-name="T2">(39/16) </text:span> [ϩⲟⲩ ⲛ̅ⲅ̅ϯ ⲙ̅ⲙⲟ]ⲟⲩ ⲛ̅ⲛⲉⲕϩⲟⲙⲟⲡ̅ⲛⲁ̅ <text:line-break/><text:span text:style-name="T1"> </text:span><text:span text:style-name="T2">(39/17) </text:span> [ϩ̅ⲙ̅ ⲡⲉⲑⲏⲡ ⲡⲁ]ⲓ̣̈ ⲡⲉ ⲡⲙⲩⲥⲧⲏⲣⲓ‐ <text:line-break/><text:span text:style-name="T1"> </text:span><text:span text:style-name="T2">(39/18) </text:span> [ⲟⲛ ⲛ̅ⲧⲅⲉⲛⲉⲁ ⲉ]ⲧⲉ ⲙⲉⲥⲕⲓⲙ· ⲁⲥⲉⲓ̈ϩⲁ‐ <text:line-break/><text:span text:style-name="T1"> </text:span><text:span text:style-name="T2">(39/19) </text:span> [ⲧⲁϩⲏ ⲛ̅ⲕⲉⲥⲟ]ⲡ· ⲛ̅ϭⲓ ⲧⲉⲉⲓⲙⲉⲉⲩ ϩⲱⲃ <text:line-break/><text:span text:style-name="T1"> </text:span><text:span text:style-name="T2">(39/20) </text:span> [ⲛⲓⲙ ⲛ̅ⲧⲁⲥⲁⲁ]ⲩ̣ ϩ̅ⲙ̅ ⲡⲕⲟⲥⲙⲟⲥ ⲛⲉⲥ‐ <text:line-break/><text:span text:style-name="T1"> </text:span><text:span text:style-name="T2">(39/21) </text:span> [ⲧⲁϩⲉⲥ ⲉⲣⲁⲧϥ̅] ⲙ̅ⲡϩⲩⲥⲧⲉⲣⲏⲙⲁ ϯⲛⲁ‐ <text:line-break/><text:span text:style-name="T1"> </text:span><text:span text:style-name="T2">(39/22) </text:span> [ⲧⲁⲙⲉ ⲧⲏⲩⲧ̅ⲛ̅] ⲟⲛ ⲉⲧⲉⲧ̅ⲛ̅ⲛⲏⲟⲩ ⲕⲁⲓ ⲅⲁⲣ <text:line-break/><text:span text:style-name="T1"> </text:span><text:span text:style-name="T2">(39/23) </text:span> [ⲁⲓϯ ⲛⲁⲓ̈ ⲛⲁⲕ] ⲉⲥϩⲁⲓ̈ⲥⲟⲩ ⲁⲩⲱ ⲛ̅ⲥⲉ ⲕⲁⲁⲩ <text:line-break/><text:span text:style-name="T1"> </text:span><text:span text:style-name="T2">(39/24) </text:span> [ϩ̅ⲛ̅ ⲟⲩⲁ]ⲥⲫⲁⲗⲓⲁ· ⲧⲟⲧⲉ ⲡⲉϫⲁϥ ⲛⲁⲓ̈ ϫⲉ <text:line-break/><text:span text:style-name="T1"> </text:span><text:span text:style-name="T2">(39/25) </text:span> [ϥⲥϩⲟⲩ]ⲟ̣ⲣⲧ· ⲛ̅ϭⲓ ⲟⲩⲟⲛ ⲛⲓⲙ· ⲉⲧⲛⲁ ⲧⲁⲁⲩ <text:line-break/><text:span text:style-name="T1"> </text:span><text:span text:style-name="T2">(40/1) </text:span> ⲉⲧⲃⲉ ⲇⲱⲣⲟⲛ ⲏ̣ ⲉ̣ⲧ̣[ⲃⲉ ϩⲉⲛϣⲧⲏⲛ ⲏ] <text:line-break/><text:span text:style-name="T1"> </text:span><text:span text:style-name="T2">(40/2) </text:span> ⲉⲧⲃⲉ ϩⲉⲛϭⲓ ⲛ̅ⲥⲱ ⲏ ⲉⲧⲃ̣ⲉ̣ [ϩⲉⲛϭⲓⲛ̅]‐ <text:line-break/><text:span text:style-name="T1"> </text:span><text:span text:style-name="T2">(40/3) </text:span> ⲟⲩⲱⲙ· ⲏ ⲉⲧⲃⲉ ⲟⲩϩ̅ⲃⲥⲱ ⲏ ⲉⲧⲃⲉ̣ <text:line-break/><text:span text:style-name="T1"> </text:span><text:span text:style-name="T2">(40/4) </text:span> ⲕⲉϩⲱⲃ ⲛ̅ⲧⲉⲉⲓⲙⲓⲛⲉ· ⲁϥϯ ⲉⲧⲟⲟ̣ⲧ̣[ϥ] <text:line-break/><text:span text:style-name="T1"> </text:span><text:span text:style-name="T2">(40/5) </text:span> ⲙ̅ⲡⲉⲉⲓⲙⲩⲥⲧⲏⲣⲓⲟⲛ ⲡⲁⲓ̈ ⲛ̣̅[ⲧⲉⲩ]‐ <text:line-break/><text:span text:style-name="T1"> </text:span><text:span text:style-name="T2">(40/6) </text:span> ⲛⲟⲩ ⲁϥⲣ̅ⲁⲫⲁⲛⲧⲟⲥ ⲉⲣⲟϥ· [ⲁϥⲁϩⲉ]‐ <text:line-break/><text:span text:style-name="T1"> </text:span><text:span text:style-name="T2">(40/7) </text:span> ⲉⲣⲁⲧⲟⲩ ⲛ̅ⲛⲉϥϣ̅ⲃ̅ⲣ̅ⲙⲁⲑⲏⲧⲏ̣[ⲥ ⲁϥ]‐ <text:line-break/><text:span text:style-name="T1"> </text:span><text:span text:style-name="T2">(40/8) </text:span> ⲣ̅ⲁⲣⲭⲉⲥⲑⲁⲓ ⲉϣⲁϫⲉ ⲛ̅ⲙ̅ⲙⲁⲩ [ϩⲁ ⲛ̅]‐ <text:line-break/><text:span text:style-name="T1"> </text:span><text:span text:style-name="T2">(40/9) </text:span> ϣⲁϫⲉ ⲛ̅ⲧⲁ ⲡⲥⲱⲧⲏⲣ ϫⲟⲟⲩ ⲉ̣[ⲣⲟϥ] <text:line-break/><text:span text:style-name="T1"> </text:span><text:span text:style-name="T2">(40/10) </text:span> ⲡ̅ⲁ̅ ⲡⲟ̅ⲕ̅ⲣⲩⲫⲟ̅ⲛ̅ ⲛ̅ <text:line-break/><text:span text:style-name="T1"> </text:span><text:span text:style-name="T2">(40/11) </text:span> ⲓ̅̈̅ⲱ̅ϩ̅ⲁ̅ⲛ̅ⲛ̅ⲏ̅[ⲥ̅] </text:p>
      <text:p text:style-name="P1"/>
      <text:p text:style-name="P3">( codex III ) The Gospel of the Egyptians</text:p>
      <text:p text:style-name="P2"><text:span text:style-name="T1"> </text:span><text:span text:style-name="T2">(40/12) </text:span> ⲡϫⲱⲱⲙⲉ ⲛ̅{ⲧ}ϩ̣[ⲓⲉ]ⲣ̣[ⲁ ⲛ̅ⲧⲉ ⲛ̅ⲣⲙ̅ⲛ̅ⲕⲏⲙⲉ] <text:line-break/><text:span text:style-name="T1"> </text:span><text:span text:style-name="T2">(40/13) </text:span> ⲛ̅ⲧⲉ ⲡⲓⲛⲟϭ ⲛⲁⲧⲛⲁⲩ ⲉⲣ̣[ⲟϥ ⲙ̅ⲡ̅ⲛ̅ⲁ̅ ⲡⲉⲓ]‐ <text:line-break/><text:span text:style-name="T1"> </text:span><text:span text:style-name="T2">(40/14) </text:span> ⲱⲧ%6 ⲛ̅ⲁⲧϫⲱ ⲙ̅ⲡⲉϥⲣⲁ[ⲛ ⲡⲉⲛⲧⲁϥⲉⲓ ⲉ]‐ <text:line-break/><text:span text:style-name="T1"> </text:span><text:span text:style-name="T2">(40/15) </text:span> ⲃⲟⲗ ϩ̅ⲛ̅ ⲛⲉⲧϫⲟⲥⲉ ⲛ̅ⲧ[ⲉ ⲡⲓϫⲱⲕ ⲡⲟⲩ]‐ <text:line-break/><text:span text:style-name="T1"> </text:span><text:span text:style-name="T2">(40/16) </text:span> ⲟⲉⲓⲛ ⲛ̅ⲡⲟⲩⲟⲉⲓⲛ ⲛ̅ⲛ[ⲓⲁⲓⲱⲛ ⲛ̅ⲟⲩⲟ]‐ <text:line-break/><text:span text:style-name="T1"> </text:span><text:span text:style-name="T2">(40/17) </text:span> ⲉⲓⲛ · ⲡⲟⲩⲟⲉⲓⲛ ⲛ̅ⲧⲉ ⲧ[ⲥⲓⲅⲏ ⲛ̅ⲧⲡⲣⲟ]‐ <text:line-break/><text:span text:style-name="T1"> </text:span><text:span text:style-name="T2">(40/18) </text:span> ⲛⲟⲓⲁ 〈ⲙ〉ⲛ̅ ⲡⲉⲓⲱⲧ%6 ⲛ̅ⲧⲥⲓⲅ̣ⲏ̣ ⲡ̣[ⲟⲩⲟⲉⲓⲛ] <text:line-break/><text:span text:style-name="T1"> </text:span><text:span text:style-name="T2">(40/19) </text:span> ⲙ̅ⲡϣⲁϫⲉ ⲙ̅〈ⲛ〉 ⲧⲙⲏⲉ ⲡⲟⲩⲟ̣[ⲉⲓⲛ ⲛ̅ⲛⲓ] <text:line-break/><text:span text:style-name="T1"> </text:span><text:span text:style-name="T2">(41/1) </text:span> [ⲁⲫⲑⲁ]ⲣ̣ⲥ̣ⲓ̣[ⲁ· ⲡⲟ]ⲩ̣ⲟⲉⲓⲛ ⲉⲧⲉ ⲙ̅ⲛ̅ ⲁⲣⲏϫϥ̅· <text:line-break/><text:span text:style-name="T1"> </text:span><text:span text:style-name="T2">(41/2) </text:span> [ⲡ%6]ⲡ̣ⲉⲓⲣⲉ ⲉⲃⲟⲗ ϩ̅ⲛ̅ ⲛⲓⲁⲓⲱⲛ ⲛ̅ⲟⲩⲟⲉⲓⲛ <text:line-break/><text:span text:style-name="T1"> </text:span><text:span text:style-name="T2">(41/3) </text:span> ⲛ̅ⲧⲉ ⲡⲉⲓⲱⲧ%6 ⲛ̅ⲁⲧ%6ⲟⲩⲱⲛϩ ⲉⲃⲟⲗ ⲛ̅ⲁⲥⲏ‐ <text:line-break/><text:span text:style-name="T1"> </text:span><text:span text:style-name="T2">(41/4) </text:span> ⲙⲁⲛⲧⲟⲥ ⲛ̅ⲁⲧϩ̅ⲗ̅ⲗⲟ ⲛ̅ⲁⲧ%6ⲉⲩⲁⲅ%6ⲅⲉⲗⲓ ⲙ̅ⲙⲟϥ <text:line-break/><text:span text:style-name="T1"> </text:span><text:span text:style-name="T2">(41/5) </text:span> ⲡⲁ̣[ⲓ]ⲱⲛ ⲛ̅ⲛⲓⲁⲓⲱⲛ ⲛ̅ⲁⲩⲧⲟⲅⲉⲛⲏⲥ ⲛ̅‐ <text:line-break/><text:span text:style-name="T1"> </text:span><text:span text:style-name="T2">(41/6) </text:span> [ⲁⲩ]ⲧ̣ⲟⲅⲉⲛⲓⲟⲥ ⲛ̅ⲉⲡⲓⲅⲉⲛⲛⲓⲟⲥ ⲛ̅ⲁⲗⲗⲟⲅⲉ‐ <text:line-break/><text:span text:style-name="T1"> </text:span><text:span text:style-name="T2">(41/7) </text:span> [ⲛ]ⲓ̣ⲟⲥ ⲡⲁⲓⲱⲛ ⲛ̅ⲙⲉ ⲁⲗⲏⲑⲱⲥ ⲁⲩⲡⲣⲟ‐ <text:line-break/><text:span text:style-name="T1"> </text:span><text:span text:style-name="T2">(41/8) </text:span> [ⲉⲗⲑ]ⲉ̣ ⲉⲃⲟⲗ ⲛ̅ϩⲏⲧ̅ϥ̅ · ⲛ̅ϭⲓ ϣⲟⲙⲧⲉ ⲛ̅ϭⲟⲙ <text:line-break/><text:span text:style-name="T1"> </text:span><text:span text:style-name="T2">(41/9) </text:span> [ⲉⲛ]ⲁⲓ̈ ⲛⲉ ⲡⲉⲓⲱⲧ%6 ⲧⲙⲁⲁⲩ ⲡϣⲏⲣⲉ ⲉ‐ <text:line-break/><text:span text:style-name="T1"> </text:span><text:span text:style-name="T2">(41/10) </text:span> [ⲃⲟⲗ] ϩ̣̅̅ⲛ̅ ⲧⲥⲓⲅⲏ ⲉⲧⲟⲛϩ ⲡ%6ⲡⲓⲣⲉ ⲉⲃⲟⲗ ϩ̅ⲙ̅ <text:line-break/><text:span text:style-name="T1"> </text:span><text:span text:style-name="T2">(41/11) </text:span> [ⲡⲉⲓ]ⲱⲧ%6 ⲛ̅ⲁⲫⲑⲁⲣⲧⲟⲥ ⲛⲁⲓ̈ ⲛ̅ⲧⲁⲩⲉⲓ ⲉ‐ <text:line-break/><text:span text:style-name="T1"> </text:span><text:span text:style-name="T2">(41/12) </text:span> [ⲃⲟⲗ ϩ̅]̅ⲛ̅ ⲧⲥⲓ̣ⲅ̣ⲏ ⲇⲉ ⲙ̅ⲡⲓⲁⲇⲏⲗⲟⲥ ⲛ̅ⲉⲓⲱⲧ <text:line-break/><text:span text:style-name="T1"> </text:span><text:span text:style-name="T2">(41/13) </text:span> [ⲁⲩⲱ] ⲉⲃⲟ̣[ⲗ ϩ̅]̅ⲙ̅ ⲡⲙⲁ ⲉⲧ̅ⲙ̅ⲙⲁⲩ ⲁϥⲡⲣⲟ‐ <text:line-break/><text:span text:style-name="T1"> </text:span><text:span text:style-name="T2">(41/14) </text:span> [ⲉⲗⲑⲉ ⲉⲃⲟⲗ ⲛ̅]ϭ[ⲓ] ⲇ̣ⲟⲙⲉⲇⲱⲛ ⲇⲟⲝⲟⲙⲉ‐ <text:line-break/><text:span text:style-name="T1"> </text:span><text:span text:style-name="T2">(41/15) </text:span> [ⲇⲱⲛ ⲡⲁⲓⲱⲛ ⲛ̅]ⲧ̣ⲉ ⲛⲓⲁⲓⲱⲛ ⲁⲩⲱ ⲡⲟⲩ‐ <text:line-break/><text:span text:style-name="T1"> </text:span><text:span text:style-name="T2">(41/16) </text:span> [ⲟⲉⲓⲛ ⲛ̅ⲧⲉ ⲧⲟⲩ]ⲉ̣ⲓ ⲧⲟⲩⲉⲓ ⲛ̅ⲛ̅ϭⲟⲙ ⲛ̅‐ <text:line-break/><text:span text:style-name="T1"> </text:span><text:span text:style-name="T2">(41/17) </text:span> [ⲧⲁⲩ · ⲁⲩⲱ ⲛ̅ⲧ]ⲉ̣ⲓ̣ϩⲉ ⲡϣⲏⲣⲉ ⲁϥⲉⲓ <text:line-break/><text:span text:style-name="T1"> </text:span><text:span text:style-name="T2">(41/18) </text:span> [ⲉⲃⲟⲗ ⲙ̅ⲙ]ⲉ̣ϩϥⲧⲟⲟⲩ ⲧⲙⲁⲁⲩ ⲛ̅ⲙⲉϩ‐ <text:line-break/><text:span text:style-name="T1"> </text:span><text:span text:style-name="T2">(41/19) </text:span> [ϯⲉ ⲡⲉⲓⲱ]ⲧ%6 ⲙ̅ⲙⲉϥⲥⲟⲟ{ⲟ}ⲩ ⲛⲉϥⲟ <text:line-break/><text:span text:style-name="T1"> </text:span><text:span text:style-name="T2">(41/20) </text:span> [ ] ⲁⲗⲗⲁ ⲛ̅ⲛⲁⲧ%6ϯ ⲥⲟⲉⲓⲧ%6 <text:line-break/><text:span text:style-name="T1"> </text:span><text:span text:style-name="T2">(41/21) </text:span> [ⲉⲣⲟϥ ⲡⲁⲓ̈] ⲉⲧⲉⲩⲁⲥⲏⲙⲁⲛⲧⲟⲥ ⲡⲉ ϩ̅ⲛ̅ <text:line-break/><text:span text:style-name="T1"> </text:span><text:span text:style-name="T2">(41/22) </text:span> [ⲛⲓϭⲟⲙ ⲧⲏ]ⲣⲟⲩ ⲛⲓⲉⲟⲟⲩ ⲙ̅ⲛ̅ ⲛⲓⲁ‐ <text:line-break/><text:span text:style-name="T1"> </text:span><text:span text:style-name="T2">(41/23) </text:span> [ⲫⲑⲁⲣ]ⲥ̣ⲓⲁ ⲉⲃⲟⲗ ϩ̅ⲙ̅ ⲡⲙⲁ ⲉⲧ̅ⲙ̅ⲙⲁⲩ <text:line-break/><text:span text:style-name="T1"> </text:span><text:span text:style-name="T2">(41/24) </text:span> [ⲁⲩⲉⲓ ⲉ]ⲃⲟⲗ ⲛ̅ϭⲓ ⲧϣⲟⲙⲧⲉ ⲛ̅ϭⲟⲙ· <text:line-break/><text:span text:style-name="T1"> </text:span><text:span text:style-name="T2">(42/1) </text:span> ⲧϣⲟⲙⲧⲉ ⲛ̅ϩⲟⲅ̣ⲇⲟ̣ⲁ̣ⲥ̣ ⲉⲧ̣ⲉ̣ [ⲡⲉⲓⲱⲧ%6] <text:line-break/><text:span text:style-name="T1"> </text:span><text:span text:style-name="T2">(42/2) </text:span> ϩ̅ⲛ̅ ⲟⲩⲥⲓⲅⲏ ⲙ̅ⲛ̅ ⲧⲉϥⲡⲣⲟⲛⲟⲓ̣ⲁ̣ [ⲉⲓⲛⲉ] <text:line-break/><text:span text:style-name="T1"> </text:span><text:span text:style-name="T2">(42/3) </text:span> ⲙ̅ⲙⲟⲟⲩ ⲉⲃⲟⲗ ϩ̅ⲛ̅ ⲕⲟⲩⲟⲩⲛⲧ̅ϥ̅· ⲉⲧⲉ ⲛ̅‐ <text:line-break/><text:span text:style-name="T1"> </text:span><text:span text:style-name="T2">(42/4) </text:span> ⲧⲟⲟⲩ ⲡⲉⲓⲱⲧ%6 ⲧⲙⲁⲁⲩ ⲡϣⲏⲣⲉ· <text:line-break/><text:span text:style-name="T1"> </text:span><text:span text:style-name="T2">(42/5) </text:span> ⲧϣⲟ〈ⲣⲡ〉ⲉ ⲛ̅ϩⲟⲅⲇⲟⲁⲥ ⲉⲧⲉ ⲉⲧⲃ[ⲏ]ⲏ̣ⲧ̣̅̅[̅ⲥ̅] <text:line-break/><text:span text:style-name="T1"> </text:span><text:span text:style-name="T2">(42/6) </text:span> ⲁⲡϣⲟⲙ̅ⲛ̅ⲧ ⲛ̅ϩⲟⲟⲩⲧ%6 ⲛ̅ⲁⲗⲟⲩ ⲡ[ⲣⲟ]‐ <text:line-break/><text:span text:style-name="T1"> </text:span><text:span text:style-name="T2">(42/7) </text:span> ⲉⲗⲑⲉ ⲉⲃⲟⲗ · ⲉⲧⲉ ⲧⲉⲛⲛⲟⲓⲁ ⲧⲉ ⲙ̅ⲛ̅ [ⲡⲗⲟ]‐ <text:line-break/><text:span text:style-name="T1"> </text:span><text:span text:style-name="T2">(42/8) </text:span> ⲅⲟⲥ ⲙ̅ⲛ̅ ⲧⲁⲫⲑⲁⲣⲥⲓⲁ ⲙ̅ⲛ̅ ⲡⲱ[ⲛϩ ⲛ̅]‐ <text:line-break/><text:span text:style-name="T1"> </text:span><text:span text:style-name="T2">(42/9) </text:span> ϣⲁ ⲉⲛⲉϩ· ⲡⲉⲑⲉⲗⲏⲙⲁ ⲡⲛⲟ[ⲩⲥ] <text:line-break/><text:span text:style-name="T1"> </text:span><text:span text:style-name="T2">(42/10) </text:span> ⲙ̅ⲛ̅ ⲧⲉⲡⲣⲟⲅⲛⲱⲥⲓⲥ ⲡϩⲟⲟⲩⲧ [ⲥϩⲓ]‐ <text:line-break/><text:span text:style-name="T1"> </text:span><text:span text:style-name="T2">(42/11) </text:span> ⲙⲉ ⲛ̅ⲉⲓⲱⲧ%6· ⲧⲙⲉϩⲥ̅ⲛ̅ⲧⲉ ⲛ̅ϭⲟ̣[ⲙ ⲛ̅]‐ <text:line-break/><text:span text:style-name="T1"> </text:span><text:span text:style-name="T2">(42/12) </text:span> ϩⲟⲅⲇⲟⲁⲥ ⲧⲙⲁⲁⲩ ⲧⲃⲁ̣[ⲣⲃ]ⲏ̣ⲗⲟⲛ [ⲙ̅ⲡⲁⲣ]‐ <text:line-break/><text:span text:style-name="T1"> </text:span><text:span text:style-name="T2">(42/13) </text:span> ⲑⲉⲛⲟⲥ ⲉⲡ̅ⲓ̅ⲧ̅ⲓⲧ̅ⲓⲱ̅ⲭ̅[.] . [ ] <text:line-break/><text:span text:style-name="T1"> </text:span><text:span text:style-name="T2">(42/14) </text:span> ⲁ̅ⲓ̅ · ⲙⲉ̅ⲙ̅ⲉⲛ̅ⲉ̅ⲁⲓ̅ⲙⲉ̅ⲛ̣[......ⲡⲉ]‐ <text:line-break/><text:span text:style-name="T1"> </text:span><text:span text:style-name="T2">(42/15) </text:span> ⲧϩⲓϫ̅ⲛ̅ ⲧⲡⲉ· ⲕⲁⲣⲃ[ ] <text:line-break/><text:soft-page-break/><text:span text:style-name="T1"> </text:span><text:span text:style-name="T2">(42/16) </text:span> ⲧϭⲟⲙ ⲛ̅ⲁⲑⲉⲣⲙⲏ̣[ⲛⲉⲩⲉ ⲙ̅ⲙⲟⲥ] <text:line-break/><text:span text:style-name="T1"> </text:span><text:span text:style-name="T2">(42/17) </text:span> ⲧⲙⲁⲁⲩ ⲛ̅ⲁⲧ%6ϣⲁϫ̣ⲉ̣ [ⲙ̅ⲙⲟⲥ ⲁⲥⲡⲉⲓ]‐ <text:line-break/><text:span text:style-name="T1"> </text:span><text:span text:style-name="T2">(42/18) </text:span> ⲣⲉ ⲉⲃⲟⲗ ϩⲁⲣⲓϩⲁⲣⲟⲥ ϩ[ <text:line-break/><text:span text:style-name="T1"> </text:span><text:span text:style-name="T2">(42/19) </text:span> ⲙ̅ⲙⲟⲥ ⲁⲥⲡⲣⲟⲉⲗⲑⲉ ⲉ̣[ⲃⲟⲗ · ⲁⲥⲉⲩ]‐ <text:line-break/><text:span text:style-name="T1"> </text:span><text:span text:style-name="T2">(42/20) </text:span> ⲇⲟⲕⲉⲓ ⲙ̅ⲛ̅ ⲡⲉⲓⲱⲧ%6 ⲙ̅[ⲡⲓⲕⲁⲣⲱϥ ⲛ̅]‐ <text:line-break/><text:span text:style-name="T1"> </text:span><text:span text:style-name="T2">(42/21) </text:span> ⲕⲁⲣⲱϥ ⲧⲙⲉϩϣⲟⲙⲧⲉ̣ [ⲛ̅ϭⲟⲙ ⲛ̅ϩⲟ]‐ <text:line-break/><text:span text:style-name="T1"> </text:span><text:span text:style-name="T2">(42/22) </text:span> ⲅⲇⲟⲁⲥ ⲡϣⲏⲣⲉ ⲛ̅ⲧⲥ[ⲓⲅⲏ ⲛ̅ⲥⲓⲅⲏ] <text:line-break/><text:span text:style-name="T1"> </text:span><text:span text:style-name="T2">(42/23) </text:span> ⲙ̅ⲛ̅ ⲡⲉⲕⲗⲟⲙ ⲛ̅ⲧⲥⲓⲅⲏ ⲛ̅ⲥⲓ[ⲅⲏ ⲙ̅ⲛ̅] <text:line-break/><text:span text:style-name="T1"> </text:span><text:span text:style-name="T2">(42/24) </text:span> ⲡⲉⲟⲟⲩ ⲙ̅ⲡⲉⲓⲱⲧ%6 ⲙ̅ⲛ̅ ⲧⲁⲣⲉ̣[ⲧⲏ ⲛ̅ⲧ]‐ <text:line-break/><text:span text:style-name="T1"> </text:span><text:span text:style-name="T2">(43/1) </text:span> [ⲙⲁⲁⲩ ·] ⲡ̣ⲁⲓ̣̈ ⲉ̣ϥⲉⲓⲛⲉ ⲉⲃⲟⲗ ϩ̅ⲛ̅ ⲛ̅ⲕⲟⲗ‐ <text:line-break/><text:span text:style-name="T1"> </text:span><text:span text:style-name="T2">(43/2) </text:span> [ⲡⲟⲥ] ⲛ̅ⲧⲥⲁϣϥⲉ ⲛ̅ϭⲟⲙ ⲙ̅ⲡⲛⲟϭ ⲛ̅‐ <text:line-break/><text:span text:style-name="T1"> </text:span><text:span text:style-name="T2">(43/3) </text:span> [ⲟⲩⲟ]ⲉⲓⲛ ⲛ̅ⲧⲥⲁϣϥⲉ ⲛ̅ⲥⲙⲏ ⲁⲩⲱ ⲡϣⲁ‐ <text:line-break/><text:span text:style-name="T1"> </text:span><text:span text:style-name="T2">(43/4) </text:span> [ϫⲉ] ⲡ̣ⲉ ⲡⲉⲩϫⲱⲕ ⲛⲁⲓ̈ ⲛⲉ ⲧϣⲟⲙⲧⲉ ⲛ̅‐ <text:line-break/><text:span text:style-name="T1"> </text:span><text:span text:style-name="T2">(43/5) </text:span> [ϭⲟⲙ] ⲧϣⲟⲙⲧⲉ ⲛ̅ϩⲟⲅⲇⲟⲁⲥ ⲛ̅ⲧⲁⲡⲉⲓ‐ <text:line-break/><text:span text:style-name="T1"> </text:span><text:span text:style-name="T2">(43/6) </text:span> [ⲱⲧ%6 ϩ̅]̅ⲛ̅ ⲧⲉϥⲡⲣⲟⲛⲟⲓⲁ ⲉⲓⲛⲉ ⲙ̅ⲙⲟⲟⲩ <text:line-break/><text:span text:style-name="T1"> </text:span><text:span text:style-name="T2">(43/7) </text:span> [ⲉⲃⲟⲗ] ϩ̣̅̅ⲛ̅ ⲕⲟⲟⲩⲛⲧ̅ϥ̅ · ⲁϥⲉⲓⲛⲉ ⲙ̅ⲙⲟⲟⲩ <text:line-break/><text:span text:style-name="T1"> </text:span><text:span text:style-name="T2">(43/8) </text:span> [ⲉⲃⲟⲗ] ϩ̅ⲙ̅ ⲡⲙⲁ ⲉⲧ̅ⲙ̅ⲙⲁⲩ ⲁϥⲡⲣⲟⲉⲗ‐ <text:line-break/><text:span text:style-name="T1"> </text:span><text:span text:style-name="T2">(43/9) </text:span> [ⲑⲉ ⲉ]ⲃⲟⲗ ⲛ̅ϭⲓ ⲇⲟⲙⲉⲇⲱⲛ ⲇⲟⲝⲟⲙⲉ‐ <text:line-break/><text:span text:style-name="T1"> </text:span><text:span text:style-name="T2">(43/10) </text:span> [ⲇⲱⲛ] ⲡⲁⲓⲱⲛ ⲛ̅ⲛⲓⲁⲓⲱⲛ ⲙ̅ⲛ̅ ⲡⲉ‐ <text:line-break/><text:span text:style-name="T1"> </text:span><text:span text:style-name="T2">(43/11) </text:span> [ⲑⲣⲟ]ⲛ̣ⲟⲥ ⲉⲧ̅ⲛ̅ϩⲏⲧ̅ϥ̅ · ⲙ̅ⲛ̅ ⲛ̅ⲇⲩⲛⲁⲙⲓⲥ <text:line-break/><text:span text:style-name="T1"> </text:span><text:span text:style-name="T2">(43/12) </text:span> [ⲉⲧⲕ]ⲱⲧ[ⲉ ⲉⲣ]ⲟ̣ϥ ⲛⲓⲉⲟⲟⲩ ⲙ̅ⲛ̅ ⲛⲓⲁ‐ <text:line-break/><text:span text:style-name="T1"> </text:span><text:span text:style-name="T2">(43/13) </text:span> [ⲫⲑⲁ]ⲣ̣ⲥ̣[ⲓⲁ · ⲡⲉ]ⲓ̣ⲱⲧ%6 ⲙ̅ⲡⲛⲟϭ ⲛ̅ⲟⲩⲟ‐ <text:line-break/><text:span text:style-name="T1"> </text:span><text:span text:style-name="T2">(43/14) </text:span> [ⲉⲓⲛ ⲛ̅ⲧⲁϥⲉⲓ ⲉⲃ]ⲟⲗ ϩ̅ⲙ̅ ⲡⲓⲕⲁⲣⲱϥ · ⲡⲉ <text:line-break/><text:span text:style-name="T1"> </text:span><text:span text:style-name="T2">(43/15) </text:span> [ⲡⲛⲟϭ ⲛ̅ⲇⲟⲝⲟⲙ]ⲉⲇⲱⲛ ⲛⲁⲓⲱⲛ ⲉⲧⲉ <text:line-break/><text:span text:style-name="T1"> </text:span><text:span text:style-name="T2">(43/16) </text:span> [ⲡϣⲟⲙ̅ⲛ̅ⲧ ⲛ̅ϩⲟ]ⲟ̣ⲩⲧ%6 ⲛ̅ⲁⲗⲟⲩ ⲙ̅ⲧⲟⲛ <text:line-break/><text:span text:style-name="T1"> </text:span><text:span text:style-name="T2">(43/17) </text:span> [ⲙ̅ⲙⲟⲟⲩ ⲙ̅ⲙ]ⲟ̣ϥ ⲁⲩⲱ ⲁⲩⲧⲁϫⲣⲟ ⲛ̅‐ <text:line-break/><text:span text:style-name="T1"> </text:span><text:span text:style-name="T2">(43/18) </text:span> [ϩⲣⲁⲓ̈ ⲛ̅ϩⲏⲧ̅ϥ̅] ⲙ̅ⲡⲉⲑⲣⲟⲛⲟⲥ ⲙ̅ⲡⲉϥⲉ‐ <text:line-break/><text:span text:style-name="T1"> </text:span><text:span text:style-name="T2">(43/19) </text:span> [ⲟⲟⲩ · ⲡⲁⲓ̈ ⲉⲧ]ⲉ ⲡⲉϥⲣⲁⲛ ⲛ̅ⲁⲧⲟⲩⲱⲛϩ <text:line-break/><text:span text:style-name="T1"> </text:span><text:span text:style-name="T2">(43/20) </text:span> [ⲉⲃⲟⲗ ⲥⲏϩ] ϩⲓⲱⲱϥ ϩ̅ⲛ̅ ⲧⲡⲩⲝⲟⲥ <text:line-break/><text:span text:style-name="T1"> </text:span><text:span text:style-name="T2">(43/21) </text:span> [.......].ⲥ ⲟⲩⲁ ⲡⲉ ⲡϣⲁϫⲉ ⲡⲉⲓ <text:line-break/><text:span text:style-name="T1"> </text:span><text:span text:style-name="T2">(43/22) </text:span> [ⲱⲧ%6 ⲙ̅ⲡⲟⲩⲟ]ⲉⲓⲛ ⲙ̅ⲡⲧⲏⲣϥ· ⲡⲉⲛ‐ <text:line-break/><text:span text:style-name="T1"> </text:span><text:span text:style-name="T2">(43/23) </text:span> [ⲧⲁϥⲉⲓ] ⲉ̣ⲃⲟⲗ ϩ̅ⲛ̅ ⲧⲥⲓⲅⲏ ⲉϥⲙ̅ⲧⲟⲛ <text:line-break/><text:span text:style-name="T1"> </text:span><text:span text:style-name="T2">(43/24) </text:span> [ⲙ̅ⲙⲟ]ϥ̣ ϩ̅ⲙ̅ ⲡⲓⲕⲁⲣⲱϥ ⲡⲁⲓ̈ ⲉⲧⲉ ⲡⲉϥ‐ <text:line-break/><text:span text:style-name="T1"> </text:span><text:span text:style-name="T2">(44/1) </text:span> ⲣⲁⲛ ϩ̅ⲛ̅ ⲟⲩⲥⲩⲙⲃⲟⲗⲟⲛ ⲛ̅ⲁ[ϩⲟⲣⲁⲧⲟⲛ ⲟⲩⲙⲩ]‐ <text:line-break/><text:span text:style-name="T1"> </text:span><text:span text:style-name="T2">(44/2) </text:span> ⲥⲧⲏⲣⲓⲟⲛ ⲉϥϩⲏⲡ%6 ⲛ̅ⲁⲧ̣ⲛ̣[ⲁⲩ ⲉ]ⲣ̣[ⲟϥ ⲁϥⲡⲣⲟ]‐ <text:line-break/><text:span text:style-name="T1"> </text:span><text:span text:style-name="T2">(44/3) </text:span> ⲉⲗⲑⲉ ⲉⲃⲟⲗ · ⲓⲓⲓⲓⲓⲓⲓⲓⲓⲓⲓⲓⲓⲓⲓⲓⲓⲓⲓ̣[ⲓⲓⲓ ] <text:line-break/><text:span text:style-name="T1"> </text:span><text:span text:style-name="T2">(44/4) </text:span> ⲏⲏⲏⲏⲏⲏⲏⲏⲏⲏⲏⲏⲏⲏⲏⲏⲏⲏⲏ[ⲏⲏ ⲟ] <text:line-break/><text:span text:style-name="T1"> </text:span><text:span text:style-name="T2">(44/5) </text:span> ⲟⲟⲟⲟⲟⲟⲟⲟⲟⲟⲟⲟⲟⲟⲟⲟⲟⲟⲟⲟⲟ ⲩ[ⲩⲩⲩ] <text:line-break/><text:span text:style-name="T1"> </text:span><text:span text:style-name="T2">(44/6) </text:span> ⲩⲩⲩⲩⲩⲩⲩⲩⲩⲩⲩⲩⲩⲩⲩⲩⲩ ⲉⲉⲉⲉ[ ] <text:line-break/><text:span text:style-name="T1"> </text:span><text:span text:style-name="T2">(44/7) </text:span> ⲉⲉⲉⲉⲉⲉⲉⲉⲉⲉⲉⲉⲉⲉⲉⲉⲉ ⲁⲁⲁⲁⲁⲁⲁ[ⲁⲁⲁⲁ] <text:line-break/><text:span text:style-name="T1"> </text:span><text:span text:style-name="T2">(44/8) </text:span> ⲁⲁⲁⲁⲁⲁⲁⲁⲁⲁⲁ ⲱ ⲱ ⲱ ⲱ ⲱ ⲱ ⲱ ⲱ̣[ⲱⲱⲱ] <text:line-break/><text:span text:style-name="T1"> </text:span><text:span text:style-name="T2">(44/9) </text:span> ⲱ ⲱ ⲱ ⲱ ⲱ ⲱ ⲱ ⲱ ⲱ ⲱ ⲱ · ⲁⲩⲱ [ⲛ̅ⲧⲉⲉⲓ] <text:line-break/><text:span text:style-name="T1"> </text:span><text:span text:style-name="T2">(44/10) </text:span> ϩⲉ ⲁⲧϣⲟⲙⲧⲉ ⲛ̅ϭⲟⲙ ϯ ⲥⲙⲟⲩ ⲉⲡ[ⲛⲟϭ] <text:line-break/><text:span text:style-name="T1"> </text:span><text:span text:style-name="T2">(44/11) </text:span> ⲛ̅ⲁϩⲟⲣⲁⲧⲟⲛ ⲛ̅ⲡ̅ⲛ̅ⲁ̅ ⲛ̅ⲁⲧ%6ϫⲱ ⲙ̅ⲡ[ⲉϥⲣⲁⲛ] <text:line-break/><text:span text:style-name="T1"> </text:span><text:span text:style-name="T2">(44/12) </text:span> ⲙ̅ⲡⲁⲣⲑⲉⲛⲓⲕⲟⲛ ⲛ̅ⲁⲕⲗⲏⲧⲟⲛ ⲙ̅ⲛ̣̅̅ [ⲧⲉϥ]‐ <text:line-break/><text:span text:style-name="T1"> </text:span><text:span text:style-name="T2">(44/13) </text:span> ⲁⲣⲥⲉⲛⲓⲕⲏ ⲛ̅ⲡⲁⲣⲑⲉⲛⲏ ⲁⲩⲁⲓⲧ[ⲓ ⲛ̅ⲟⲩ]‐ <text:line-break/><text:span text:style-name="T1"> </text:span><text:span text:style-name="T2">(44/14) </text:span> ϭⲟⲙ· ⲁⲥⲡⲣⲟⲉⲗⲑⲉ ⲉⲃⲟⲗ ⲛ̅ϭⲓ̣ ⲟⲩⲥⲓ[ⲅⲏ ⲛ̅]‐ <text:line-break/><text:soft-page-break/><text:span text:style-name="T1"> </text:span><text:span text:style-name="T2">(44/15) </text:span> ⲟⲩⲥⲓⲅⲏ ⲉⲥⲟⲛϩ ⲛ̅ϭⲓ ϩⲉⲛ[ⲉⲟⲟⲩ] ⲙ̅ⲛ̣̅̅ [ϩⲉⲛⲁ]‐ <text:line-break/><text:span text:style-name="T1"> </text:span><text:span text:style-name="T2">(44/16) </text:span> ⲫⲑⲁⲣⲥⲓⲁ ϩ̅ⲛ̅ ⲛⲁⲓⲱⲛ [.........ⲁⲓ] <text:line-break/><text:span text:style-name="T1"> </text:span><text:span text:style-name="T2">(44/17) </text:span> ⲱⲛ ϩⲉⲛⲧⲃⲁ ⲉⲩⲟⲩⲟϩ[ⲙ........ⲡ] <text:line-break/><text:span text:style-name="T1"> </text:span><text:span text:style-name="T2">(44/18) </text:span> ϣⲟⲙ̅ⲛ̅ⲧ̅ ⲛ̅ϩⲟⲟⲩⲧ%6 ⲧ̣[ϣⲟⲙⲧⲉ ⲛ̅ϭⲓⲛ] <text:line-break/><text:span text:style-name="T1"> </text:span><text:span text:style-name="T2">(44/19) </text:span> ϫⲡⲟ ⲛ̅ϩⲟⲟⲩⲧ%6 ⲛ̅ⲅⲉⲛ̣[ⲉⲁ ⲛ̅ϩⲟⲟⲩⲧ%6 ⲁⲩ]‐ <text:line-break/><text:span text:style-name="T1"> </text:span><text:span text:style-name="T2">(44/20) </text:span> ⲙⲉϩ ⲡⲛⲟϭ ⲛ̅ⲇⲟⲝⲟⲙ[ⲉⲇⲱⲛ ⲛ̅ⲁⲓⲱⲛ ⲛ̅]‐ <text:line-break/><text:span text:style-name="T1"> </text:span><text:span text:style-name="T2">(44/21) </text:span> ⲧϭⲟⲙ ⲙ̅ⲡϣⲁϫⲉ ⲙ̅ⲡⲉⲡ[ⲗⲏⲣⲱⲙⲁ ⲧⲏⲣ̅ϥ̅] <text:line-break/><text:span text:style-name="T1"> </text:span><text:span text:style-name="T2">(44/22) </text:span> ⲧⲟⲧⲉ ⲡϣⲟⲙⲛⲧ%6 ⲛ̅ϩⲟⲟⲩ[ⲧ%6 ⲛ̅ⲁⲗⲟⲩ ⲙ̅ⲡⲛⲟϭ] <text:line-break/><text:span text:style-name="T1"> </text:span><text:span text:style-name="T2">(44/23) </text:span> ⲛ̅ⲭ̅ⲣ̅ⲥ̅ ⲛ̅ⲧⲁϥⲧⲁϩⲥϥ ⲛ̅ϭⲓ ⲡ[ⲛⲟϭ ⲛ̅ⲁϩⲟ]‐ <text:line-break/><text:span text:style-name="T1"> </text:span><text:span text:style-name="T2">(44/24) </text:span> ⲣⲁⲧⲟⲛ ⲙ̅ⲡ̅ⲛ̅ⲁ̅ ⲡⲁⲓ̈ ⲛ̅ⲧ[ⲁⲩϯ ⲣⲁⲛ ⲉⲧⲉϥ] <text:line-break/><text:span text:style-name="T1"> </text:span><text:span text:style-name="T2">(44/25) </text:span> ϭⲟⲙ ϫⲉ ⲁⲓⲛⲟⲛ ⲁϥϯ [ⲛ̅ⲟ]ⲩ̣[ⲥⲙⲟⲩ ⲙ̅]‐ <text:line-break/><text:span text:style-name="T1"> </text:span><text:span text:style-name="T2">(44/26) </text:span> ⲡⲛⲟϭ ⲛ̅ⲁϩⲟⲣⲁⲧⲟⲛ ⲙ̅ⲡ̅ⲛ̅ⲁ̅ [ⲙ̅ⲛ̅ ⲧⲉϥ]‐ <text:line-break/><text:span text:style-name="T1"> </text:span><text:span text:style-name="T2">(44/27) </text:span> ⲁⲣⲥⲉⲛⲓⲕⲏ ⲙ̅ⲡⲁⲣⲑⲉⲛⲟⲥ ⲓ̈ⲱ[ⲏⲗ ⲙ̅ⲛ̅] <text:line-break/><text:span text:style-name="T1"> </text:span><text:span text:style-name="T2">(44/28) </text:span> ⲧⲥⲓⲅⲏ ⲛ̅ⲥⲓⲅⲏ ⲛ̅ⲥⲓⲅⲏ ⲙ̅ⲛ̅ ⲧⲙ̅ⲛⲧ̣̅[ⲛⲟϭ] <text:line-break/><text:span text:style-name="T1"> </text:span><text:span text:style-name="T2">(44/29) </text:span> (pages 45-48 are missing) <text:line-break/><text:span text:style-name="T1"> </text:span><text:span text:style-name="T2">(49/1) </text:span> [ⲉⲃⲟⲗ ϩ̅ⲙ̅ ⲡⲙⲁ ⲉ]ⲧ̣̅ⲙ̅ⲙⲁⲩ ⲛ̅ϭⲓ ⲧϭⲏ‐ <text:line-break/><text:span text:style-name="T1"> </text:span><text:span text:style-name="T2">(49/2) </text:span> [ⲡⲉ ⲙ̅ⲡ]ⲛⲟϭ ⲛ̅ⲟⲩⲟⲉⲓⲛ ⲧⲇⲩⲛⲁⲙⲓⲥ <text:line-break/><text:span text:style-name="T1"> </text:span><text:span text:style-name="T2">(49/3) </text:span> [ⲉ]ⲧ̣ⲟⲛϩ · ⲧⲙⲁⲁⲩ ⲛ̅ⲛⲓⲁⲫⲑⲁⲣⲧⲟⲥ ⲉⲧⲟⲩ‐ <text:line-break/><text:span text:style-name="T1"> </text:span><text:span text:style-name="T2">(49/4) </text:span> [ⲁ]ⲁ̣ⲃ · ⲧⲛⲟϭ ⲛ̅ⲇⲩⲛⲁⲙⲓⲥ ⲧⲙⲓⲣⲟⲑⲟⲏ <text:line-break/><text:span text:style-name="T1"> </text:span><text:span text:style-name="T2">(49/5) </text:span> ⲁ̣ⲩⲱ ⲁⲥϫⲡⲟ ⲙ̅ⲡⲉⲉⲓ ⲉϯⲟⲛⲟⲙⲁⲍⲉ <text:line-break/><text:span text:style-name="T1"> </text:span><text:span text:style-name="T2">(49/6) </text:span> ⲙ̣̅ⲡⲉϥⲣⲁⲛ · ⲉⲉⲓϫⲱ ⲙ̅ⲙⲟⲥ ϫⲉ ⲓ̅̈̅ⲉ̅ⲛ̅ <text:line-break/><text:span text:style-name="T1"> </text:span><text:span text:style-name="T2">(49/7) </text:span> [ⲓ̅̈̅]̅ⲉ̣̅̅ⲛ̅ ⲉ̅ⲁ̅ ⲉ̅ⲁ̅ ⲉ̅ⲁ̅ ⲛ̅ϣⲟⲙ̅ⲛⲧ̅ ⲛ̅ⲥⲟⲡ%6 <text:line-break/><text:span text:style-name="T1"> </text:span><text:span text:style-name="T2">(49/8) </text:span> [ⲡⲁ]ⲓ̣̈ ⲅ̣ⲁⲣ ⲁⲇⲁⲙⲁⲥ ⲡⲟⲩⲟⲉⲓⲛ ⲉⲧⲣ̅ⲟⲩⲟ‐ <text:line-break/><text:span text:style-name="T1"> </text:span><text:span text:style-name="T2">(49/9) </text:span> [ⲉ]ⲓ̣ⲛ ⲡⲉⲧⲉⲃⲟⲗ ϩ̅ⲙ̅ ⲡⲣⲱⲙⲉ ⲡⲉϩⲟⲩ‐ <text:line-break/><text:span text:style-name="T1"> </text:span><text:span text:style-name="T2">(49/10) </text:span> [ⲉⲓ]ⲧ%6 ⲛ̅ⲣⲱⲙⲉ ⲡⲉⲛⲧⲁⲛ̅ⲕⲁ ⲛⲓⲙ ϣⲱ‐ <text:line-break/><text:span text:style-name="T1"> </text:span><text:span text:style-name="T2">(49/11) </text:span> ⲡ̣ⲉ ⲉⲃⲟⲗ ⲛ̅ϩⲏⲧ̅ϥ̅ · ⲛ̅ⲕⲁ ⲛⲓⲙ ⲉϩⲟⲩⲛ <text:line-break/><text:span text:style-name="T1"> </text:span><text:span text:style-name="T2">(49/12) </text:span> ⲉⲣⲟϥ ⲉⲧⲉ ⲁϫ̅ⲛ̅ⲧ̅ϥ̅ ⲙ̅ⲡⲉⲗⲁⲁⲩ ϣⲱⲡⲉ <text:line-break/><text:span text:style-name="T1"> </text:span><text:span text:style-name="T2">(49/13) </text:span> ⲁϥⲡⲣⲟⲉⲗⲑⲉ ⲉⲃⲟⲗ ⲛ̅ϭⲓ ⲡⲓⲱⲧ%6 ⲛ̅ⲁⲧ‐ <text:line-break/><text:span text:style-name="T1"> </text:span><text:span text:style-name="T2">(49/14) </text:span> ⲛⲟⲉⲓ ⲙ̅ⲙⲟϥ ⲛ̅ⲛⲁⲡⲉⲣⲓⲛⲟⲏⲧⲟⲥ · ⲁϥ‐ <text:line-break/><text:span text:style-name="T1"> </text:span><text:span text:style-name="T2">(49/15) </text:span> {ⲉ̅ⲓ} ⲉⲃⲟ[ⲗ] ϫ̅ⲛ̅ ⲙ̅ⲡⲥⲁϩⲣⲉ ϣⲁ ⲡⲉⲥⲏⲧ <text:line-break/><text:span text:style-name="T1"> </text:span><text:span text:style-name="T2">(49/16) </text:span> ϣⲁ ⲡⲙⲟ̣ⲩⲛⲕ̣ ⲙ̅ⲡϣⲱⲱⲧ%6 ⲧⲟⲧⲉ <text:line-break/><text:span text:style-name="T1"> </text:span><text:span text:style-name="T2">(49/17) </text:span> ⲡⲛⲟϭ ⲛ̅ⲗⲟⲅⲟⲥ ⲡⲁⲩⲧⲟⲅⲉⲛⲏⲥ ⲛ̅‐ <text:line-break/><text:span text:style-name="T1"> </text:span><text:span text:style-name="T2">(49/18) </text:span> ⲛⲟⲩⲧ̣ⲉ ⲙⲛ ⲡⲁⲫⲑⲁⲣⲧⲟⲥ ⲛ̅ⲣⲱⲙⲉ <text:line-break/><text:span text:style-name="T1"> </text:span><text:span text:style-name="T2">(49/19) </text:span> ⲁⲇⲁⲙⲁⲥ ⲁⲩⲙⲟⲩϫⲧ%6 ⲙ̅ⲛ̅ ⲛⲉⲩⲉⲣⲏ‐ <text:line-break/><text:span text:style-name="T1"> </text:span><text:span text:style-name="T2">(49/20) </text:span> ⲟⲩ ⲁϥϣⲱⲡⲉ ⲛ̅ϭⲓ ⲟⲩⲗⲟⲅⲟⲥ ⲛ̅ⲧⲉ <text:line-break/><text:span text:style-name="T1"> </text:span><text:span text:style-name="T2">(49/21) </text:span> ⲡⲣⲱⲙⲉ ⲁⲩⲱ ⲡⲣⲱⲙⲉ ϩⲱⲱϥ <text:line-break/><text:span text:style-name="T1"> </text:span><text:span text:style-name="T2">(49/22) </text:span> ⲛ̅ⲧⲁϥϣⲱⲡⲉ ϩⲓⲧ̅ⲛ̅ →ⲟⲩ←ϣⲁϫⲉ ⲁϥ‐ <text:line-break/><text:span text:style-name="T1"> </text:span><text:span text:style-name="T2">(49/23) </text:span> ϯ ⲛ̅ⲟⲩⲥⲙⲟⲩ ⲙ̅ⲡⲛⲟϭ ⲛⲁϩⲟⲣⲁⲧⲟⲛ <text:line-break/><text:span text:style-name="T1"> </text:span><text:span text:style-name="T2">(49/24) </text:span> ⲛ̅ⲁⲧ%6ⲧⲁϩⲟϥ ⲙ̅ⲡⲁⲣⲑⲉⲛⲓⲕⲟⲛ ⲙ̅‐ <text:line-break/><text:span text:style-name="T1"> </text:span><text:span text:style-name="T2">(49/25) </text:span> ⲡ̅ⲛ̅ⲁ̅ ⲙ̅ⲛ̅ ⲧⲁⲣⲥⲉⲛⲓⲕⲏ ⲛ̅ⲡⲁⲣⲑⲉⲛⲟⲥ <text:line-break/><text:span text:style-name="T1"> </text:span><text:span text:style-name="T2">(49/26) </text:span> ⲙ̅ⲛ̅ ⲡϣⲟⲙ̅ⲛⲧ̅ ⲛ̅ϩⲟⲟⲩⲧ%6 ⲛ̅ⲁⲗⲟⲩ <text:line-break/><text:span text:style-name="T1"> </text:span><text:span text:style-name="T2">(50/1) </text:span> ⲙ̅ⲛ̅ ⲧⲁⲣⲥⲉⲛⲓⲕ[ⲏ ⲛ̅ⲡⲁ]ⲣ̣[ⲑⲉⲛⲟⲥ] <text:line-break/><text:span text:style-name="T1"> </text:span><text:span text:style-name="T2">(50/2) </text:span> ⲓ̅̈̅ⲟ̅ⲩ̅ⲏ̅ⲗ̅ ⲙ̅ⲛ̅ ⲏⲥⲏⲫⲏⲭ ⲡⲉⲧ̣[ⲉⲙⲁϩ]‐ <text:line-break/><text:span text:style-name="T1"> </text:span><text:span text:style-name="T2">(50/3) </text:span> ⲧⲉ ⲙ̅ⲡⲉⲟⲟⲩ ⲡⲁⲗⲟⲩ ⲙ̅ⲡⲁⲗⲟⲩ ⲙ̅ⲛ̣̅̅ <text:line-break/><text:span text:style-name="T1"> </text:span><text:span text:style-name="T2">(50/4) </text:span> ⲡⲉⲕⲗⲟⲙ ⲙ̅ⲡⲉϥⲉⲟⲟⲩ ⲙ̅ⲛ̅ ⲡⲛⲟϭ̣ <text:line-break/><text:span text:style-name="T1"> </text:span><text:span text:style-name="T2">(50/5) </text:span> ⲛ̅ⲇⲟⲝⲟⲙⲉⲇⲱⲛ ⲛ̅ⲁⲓⲱⲛ ⲙ̅ⲛ̅ <text:line-break/><text:span text:style-name="T1"> </text:span><text:span text:style-name="T2">(50/6) </text:span> ⲛⲉⲑⲣⲟⲛⲟⲥ ⲉⲧ̅ⲛ̅ϩⲏⲧ̅ϥ̅ · ⲙ̅ⲛ̅ ⲛ̅‐ <text:line-break/><text:soft-page-break/><text:span text:style-name="T1"> </text:span><text:span text:style-name="T2">(50/7) </text:span> ϭⲟⲙ ⲉⲧⲕⲱⲧⲉ ⲉⲣⲟϥ ⲛⲓⲉⲟⲟⲩ ⲙ̅[̅ⲛ̅] <text:line-break/><text:span text:style-name="T1"> </text:span><text:span text:style-name="T2">(50/8) </text:span> ⲛⲓⲁⲫⲑⲁⲣⲥⲓⲁ ⲙ̅ⲛ̅ ⲡⲉⲩⲡⲗⲏⲣ[ⲱ] <text:line-break/><text:span text:style-name="T1"> </text:span><text:span text:style-name="T2">(50/9) </text:span> ⲙⲁ ⲧⲏⲣ̅ϥ̅ · ⲛ̅ⲧⲁⲉⲓϫⲟⲟϥ ⲛ̅ϣⲟ̣‐ <text:line-break/><text:span text:style-name="T1"> </text:span><text:span text:style-name="T2">(50/10) </text:span> ⲣ̅ⲡ̅ · ⲙ̅ⲛ̅ ⲡⲕⲁϩ ⲛ̅ⲁⲉⲣⲟⲇⲓⲟⲥ ⲡⲓ‐ <text:line-break/><text:span text:style-name="T1"> </text:span><text:span text:style-name="T2">(50/11) </text:span> ϣⲁⲡ ⲛⲟⲩⲧⲉ ⲉϩⲟⲩⲛ ⲉⲣⲟϥ ⲡⲙⲁ <text:line-break/><text:span text:style-name="T1"> </text:span><text:span text:style-name="T2">(50/12) </text:span> ⲉϣⲁⲩϫⲓ ϩⲓⲕⲱⲛ ⲛ̅ϩⲏⲧ̅ϥ̅ ⲛ̅ϭⲓ <text:line-break/><text:span text:style-name="T1"> </text:span><text:span text:style-name="T2">(50/13) </text:span> ⲛ̅ⲣⲱⲙⲉ ⲉⲧⲟⲩⲁⲁⲃ ⲙ̅ⲡⲛⲟϭ <text:line-break/><text:span text:style-name="T1"> </text:span><text:span text:style-name="T2">(50/14) </text:span> ⲛ̅ⲟⲩⲟⲉⲓⲛ ⲛ̅ⲣⲱⲙⲉ ⲙ̅ⲡ̣ⲓⲱⲧ%6 <text:line-break/><text:span text:style-name="T1"> </text:span><text:span text:style-name="T2">(50/15) </text:span> ⲛ̅ⲧⲥⲓⲅⲏ ⲛ̅ⲥⲓⲅⲏ ⲉ̣[ⲧ]ⲟ̣ⲛϩ ⲡⲉⲓⲱⲧ%6 <text:line-break/><text:span text:style-name="T1"> </text:span><text:span text:style-name="T2">(50/16) </text:span> ⲙ̅ⲛ̅ ⲡⲉⲩⲡⲗⲏⲣⲱⲙⲁ ⲧⲏⲣ̅ϥ̅ · ⲛ̅‐ <text:line-break/><text:span text:style-name="T1"> </text:span><text:span text:style-name="T2">(50/17) </text:span> ⲑⲉ ⲛ̅ⲧⲁⲉⲓϫⲟⲟⲥ ⲛ̅ϣⲟⲣ[ⲡ%6] ⲁϥϯ‐ <text:line-break/><text:span text:style-name="T1"> </text:span><text:span text:style-name="T2">(50/18) </text:span> ⲛ̅ⲟⲩⲥⲙⲟⲩ ⲛ̅ϭⲓ ⲡⲛⲟϭ ⲛ̅ⲗⲟⲅⲟⲥ <text:line-break/><text:span text:style-name="T1"> </text:span><text:span text:style-name="T2">(50/19) </text:span> ⲡⲁⲩⲧⲟⲅⲉⲛⲏⲥ ⲛ̅ⲛⲟⲩⲧⲉ ⲙ̅ⲛ̅ <text:line-break/><text:span text:style-name="T1"> </text:span><text:span text:style-name="T2">(50/20) </text:span> ⲡⲁⲫⲑⲁⲣⲧⲟⲥ ⲛ̅ⲣⲱⲙⲉ ⲁⲇⲁ‐ <text:line-break/><text:span text:style-name="T1"> </text:span><text:span text:style-name="T2">(50/21) </text:span> ⲙⲁⲥ ⲁⲩⲁⲓⲧⲓ ⲛ̅ⲟⲩⲇⲩⲛⲁⲙⲓⲥ ⲙ̅ⲛ̅ <text:line-break/><text:span text:style-name="T1"> </text:span><text:span text:style-name="T2">(50/22) </text:span> ⲟⲩⲛⲁⲙⲧⲉ ⲛ̅ϣⲁ ⲁⲛⲏϩⲉ ⲙ̅ⲡⲁⲩ‐ <text:line-break/><text:span text:style-name="T1"> </text:span><text:span text:style-name="T2">(50/23) </text:span> ⲧⲟⲅⲉⲛⲏⲥ ⲙ̅〈ⲡ〉ⲡⲗⲏⲣⲱⲙⲁ ⲙ̅ⲡⲉ‐ <text:line-break/><text:span text:style-name="T1"> </text:span><text:span text:style-name="T2">(50/24) </text:span> ϥⲧⲟⲟⲩ ⲛ̅ⲁⲓⲱⲛ ϫⲉⲕⲁⲁⲥ ⲉⲃⲟⲗ <text:line-break/><text:span text:style-name="T1"> </text:span><text:span text:style-name="T2">(50/25) </text:span> ϩⲓⲧⲟⲟⲧⲟⲩ ⲉϥⲛⲁⲟⲩⲱⲛϩ ⲉⲃⲟⲗ <text:line-break/><text:span text:style-name="T1"> </text:span><text:span text:style-name="T2">(51/1) </text:span> [.......ⲛ̅]ϭ̣[ⲓ] ⲡ̣ⲉⲟⲟⲩ →ⲙ←ⲛ̅ ⲧⲇⲩ‐ <text:line-break/><text:span text:style-name="T1"> </text:span><text:span text:style-name="T2">(51/2) </text:span> [ⲛⲁⲙ]ⲓ̣ⲥ ⲙ̅ⲡⲁϩⲟⲣⲁⲧⲟⲥ ⲛ̅ⲉⲓⲱⲧ%6 ⲛ̅‐ <text:line-break/><text:span text:style-name="T1"> </text:span><text:span text:style-name="T2">(51/3) </text:span> ⲛⲣⲱⲙⲉ ⲉⲧⲟⲩⲁⲁⲃ · ⲙ̅ⲡⲛⲟϭ ⲛⲟⲩ‐ <text:line-break/><text:span text:style-name="T1"> </text:span><text:span text:style-name="T2">(51/4) </text:span> ⲟⲉⲓⲛ ⲡⲁⲓ̈ ⲉⲧⲛⲏⲟⲩ ⲉⲡⲕⲟⲥⲙⲟⲥ <text:line-break/><text:span text:style-name="T1"> </text:span><text:span text:style-name="T2">(51/5) </text:span> ⲉϥⲟ ⲙ̅ⲡⲓⲛⲉ ⲛ̅ⲧⲉⲩϣⲏ ⲡⲁⲫⲑⲁⲣ‐ <text:line-break/><text:span text:style-name="T1"> </text:span><text:span text:style-name="T2">(51/6) </text:span> [ⲧ]ⲟⲥ ⲛ̅ⲣⲱⲙⲉ ⲁⲇⲁⲙⲁⲥ ⲁϥⲁⲓⲧⲓ ⲛⲁⲩ <text:line-break/><text:span text:style-name="T1"> </text:span><text:span text:style-name="T2">(51/7) </text:span> ⲛ̅ⲟⲩϣⲏⲣⲉ ⲉⲃⲟⲗ ⲛ̅ϩⲏⲧ̅ϥ̅ · ϫⲉⲕⲁ‐ <text:line-break/><text:span text:style-name="T1"> </text:span><text:span text:style-name="T2">(51/8) </text:span> ⲁⲥ ⲉϥⲉϣⲱⲡⲉ ⲛ̅ⲉⲓⲱⲧ ⲛ̅ⲧⲅⲉⲛⲉⲁ <text:line-break/><text:span text:style-name="T1"> </text:span><text:span text:style-name="T2">(51/9) </text:span> ⲉ̣ⲧⲉⲙⲉⲥⲕⲓⲙ ⲛ̅ⲁⲫⲑⲁⲣⲧⲟⲛ ϫⲉ <text:line-break/><text:span text:style-name="T1"> </text:span><text:span text:style-name="T2">(51/10) </text:span> ⲕ̣ⲁⲁⲥ ⲉⲃⲟⲗ ϩⲓⲧⲟⲟⲧ̅ⲥ̅ · ⲉⲥⲛⲁⲟⲩⲱⲛϩ <text:line-break/><text:span text:style-name="T1"> </text:span><text:span text:style-name="T2">(51/11) </text:span> ⲉⲃⲟⲗ ⲛ̅ϭⲓ ⲧⲥⲓⲅⲏ ⲙ̅ⲛ̅ ⲧⲉⲫⲱⲛⲏ <text:line-break/><text:span text:style-name="T1"> </text:span><text:span text:style-name="T2">(51/12) </text:span> ⲁⲩⲱ ⲉⲃⲟⲗ ϩⲓⲧⲟⲟⲧ̅ⲥ̅ ⲉϥⲉⲧⲟⲩⲛ̅ϥ̅ <text:line-break/><text:span text:style-name="T1"> </text:span><text:span text:style-name="T2">(51/13) </text:span> ⲛ̅ϭⲓ ⲡⲁⲓⲱⲛ ⲉⲧⲙⲟⲟⲩⲧ%6 ϫⲉⲕⲁⲁⲥ <text:line-break/><text:span text:style-name="T1"> </text:span><text:span text:style-name="T2">(51/14) </text:span> ⲉϥⲉⲕ[ⲁ]ⲧⲁⲗⲩ · ⲁⲩⲱ ⲛ̅ⲧⲉⲉⲓϩⲉ ⲁ‐ <text:line-break/><text:span text:style-name="T1"> </text:span><text:span text:style-name="T2">(51/15) </text:span> ⲥⲉⲓ ⲉⲃⲟⲗ ϫⲓⲛ ⲛ̅ⲡⲥⲁϩⲣⲉ ⲛ̅ϭⲓ ⲧⲇⲩ‐ <text:line-break/><text:span text:style-name="T1"> </text:span><text:span text:style-name="T2">(51/16) </text:span> ⲛⲁⲙⲓⲥ ⲙ̅ⲡⲛⲟϭ ⲛ̅ⲟⲩⲟⲉⲓⲛ ⲧⲉ <text:line-break/><text:span text:style-name="T1"> </text:span><text:span text:style-name="T2">(51/17) </text:span> ⲡⲣⲟⲫⲁⲛⲓⲁ ⲁⲥϫⲡⲟ ⲙ̅ⲡⲉϥⲧⲟⲟⲩ <text:line-break/><text:span text:style-name="T1"> </text:span><text:span text:style-name="T2">(51/18) </text:span> ⲙ̅ⲫⲱⲥⲧⲏⲣ ϩ̅ⲁ̅ⲣ̅ⲙ̅ⲟ̅ⲍ̅ⲏ̅ⲗ̅ · ⲟ̅ⲣⲟⲓ̈ⲁⲏⲗ̅ <text:line-break/><text:span text:style-name="T1"> </text:span><text:span text:style-name="T2">(51/19) </text:span> ⲇ̅ⲁ̅ⲩ̅ⲉ̅ⲓ̅ⲑ̅ⲉ̅ ⲏ̅ⲗⲏⲗⲏⲑ̅ · ⲉⲧⲛⲁϣⲱϥ <text:line-break/><text:span text:style-name="T1"> </text:span><text:span text:style-name="T2">(51/20) </text:span> ⲙ̅ⲛ̅ ⲡⲛⲟϭ ⲛ̅ⲁⲫⲑⲁⲣⲧⲟⲥ ⲥ̅ⲏⲑ̅ · ⲡϣⲏ‐ <text:line-break/><text:span text:style-name="T1"> </text:span><text:span text:style-name="T2">(51/21) </text:span> ⲣⲉ ⲙ̅ⲡⲁⲫⲑⲁⲣⲧⲟⲥ ⲛ̅ⲣⲱⲙⲉ ⲁⲇⲁ‐ <text:line-break/><text:span text:style-name="T1"> </text:span><text:span text:style-name="T2">(51/22) </text:span> ⲙⲁⲥ· ⲁⲩⲱ ⲛ̅ⲧⲉⲉⲓϩⲉ ⲁⲥϫⲱⲕ ⲉⲃⲟⲗ <text:line-break/><text:span text:style-name="T1"> </text:span><text:span text:style-name="T2">(51/23) </text:span> ⲛ̅ϭⲓ ⲧϩⲉⲃⲇⲟⲙⲁⲥ ⲛ̅ⲧⲉⲗⲉⲓⲁ · ⲧⲁⲓ̈ <text:line-break/><text:span text:style-name="T1"> </text:span><text:span text:style-name="T2">(51/24) </text:span> ⲉⲧϣⲟⲟⲡ%6 ϩ̅ⲛ̅ ϩⲉⲛⲙⲩⲥⲧⲏⲣⲓⲟⲛ <text:line-break/><text:span text:style-name="T1"> </text:span><text:span text:style-name="T2">(52/1) </text:span> ⲉⲩϩⲏⲡ%6 ⲉⲥϣⲁⲛ̣ϫ̣[ⲓ ⲙ̅]ⲡ̣ⲉ̣[ⲟⲟⲩ] <text:line-break/><text:span text:style-name="T1"> </text:span><text:span text:style-name="T2">(52/2) </text:span> ϣⲁⲥⲣ̅ ⲟⲩϩⲉⲛⲇⲉⲕⲁⲥ ⲛ̅ϩⲟ̣ <text:line-break/><text:span text:style-name="T1"> </text:span><text:span text:style-name="T2">(52/3) </text:span> ⲅⲇⲟⲁⲥ ⲁⲩⲱ ⲁϥⲕⲁⲧⲁⲛⲉⲩⲉ ⲛ̅ϭⲓ <text:line-break/><text:span text:style-name="T1"> </text:span><text:span text:style-name="T2">(52/4) </text:span> ⲡⲉⲓⲱⲧ%6 ⲁϥⲥⲩⲛⲉⲩⲇⲟⲕⲉⲓ ⲛ̅ϭⲓ <text:line-break/><text:soft-page-break/><text:span text:style-name="T1"> </text:span><text:span text:style-name="T2">(52/5) </text:span> ⲡⲉⲡⲗⲏⲣⲱⲙⲁ ⲧⲏⲣ̅ϥ̅ ⲛ̅ⲛⲉ <text:line-break/><text:span text:style-name="T1"> </text:span><text:span text:style-name="T2">(52/6) </text:span> ⲫⲱⲥⲧⲏⲣ ⲁⲩⲉⲓ ⲉⲃⲟⲗ ⲛ̅ϭⲓ ⲛⲉⲩ〈ⲥⲩ̅〉 <text:line-break/><text:span text:style-name="T1"> </text:span><text:span text:style-name="T2">(52/7) </text:span> ⲍⲩⲅⲟⲥ ⲉⲡϫⲱⲕ ⲛ̅ⲧϩⲟⲅⲇⲟⲁⲥ ⲙ̅‐ <text:line-break/><text:span text:style-name="T1"> </text:span><text:span text:style-name="T2">(52/8) </text:span> ⲡⲁⲩⲧⲟⲅⲉⲛⲏⲥ ⲛ̅ⲛⲟⲩⲧⲉ ⲧⲉ <text:line-break/><text:span text:style-name="T1"> </text:span><text:span text:style-name="T2">(52/9) </text:span> ⲭⲁⲣⲓⲥ ⲙ̅ⲡⲉϩⲟⲩⲉⲓⲧ%6 ⲛ̅ⲟⲩⲟⲉⲓⲛ · <text:line-break/><text:span text:style-name="T1"> </text:span><text:span text:style-name="T2">(52/10) </text:span> ⲁ̅ⲣ̅ⲙ̅ⲟ̅ⲍ̅ⲏ̅ⲗ̅ ⲧⲉⲥⲑⲏⲥⲓⲥ ⲙ̅ⲡⲙⲉϩⲥ <text:line-break/><text:span text:style-name="T1"> </text:span><text:span text:style-name="T2">(52/11) </text:span> ⲛⲁⲩ ⲛ̅ⲟⲩⲟⲉⲓⲛ ⲟ̅ⲣ̅ⲟ̅ⲓ̅̈̅ⲁ̅ⲏ̅ⲗ̅ · ⲧⲥⲩⲛ‐ <text:line-break/><text:span text:style-name="T1"> </text:span><text:span text:style-name="T2">(52/12) </text:span> ϩⲉⲥⲓⲥ ⲙ̅ⲡⲙⲉϩϣⲟⲙ̅ⲛ̅ⲧ̅ 〈ⲛ̅〉ⲟⲩⲟⲉⲓⲛ <text:line-break/><text:span text:style-name="T1"> </text:span><text:span text:style-name="T2">(52/13) </text:span> ⲇ̅ⲁ̅ⲩ̅ⲉ̅ⲓ̅ⲑ̅ⲉ̅ · ⲧⲉⲫⲣⲟⲛⲏⲥⲓⲥ ⲛ̅〈ⲡ〉ⲙⲉϩ <text:line-break/><text:span text:style-name="T1"> </text:span><text:span text:style-name="T2">(52/14) </text:span> ϥⲧⲟⲟⲩ ⲛ̅ⲟⲩⲟⲉⲓⲛ ⲏ̅ⲗ̅ⲉ̅ⲗ̅ⲏ̅ⲑ̅ · ⲧⲁⲓ̈ <text:line-break/><text:span text:style-name="T1"> </text:span><text:span text:style-name="T2">(52/15) </text:span> ⲧⲉ ⲧⲉϩⲟⲩⲉⲓⲧⲉ ⲛ̅ϩⲟⲅⲇⲟⲁⲥ ⲛ̅ⲡⲁⲩ‐ <text:line-break/><text:span text:style-name="T1"> </text:span><text:span text:style-name="T2">(52/16) </text:span> ⲧⲟⲅⲉⲛⲏⲥ ⲛ̅ⲛⲟⲩⲧⲉ · ⲁⲩⲱ ⲁϥⲕⲁⲧⲁ‐ <text:line-break/><text:span text:style-name="T1"> </text:span><text:span text:style-name="T2">(52/17) </text:span> ⲛⲉⲩⲉ ⲛ̅ϭⲓ ⲡⲉⲓⲱⲧ%6 ⲁϥⲥⲩⲛⲉⲩⲇⲟ‐ <text:line-break/><text:span text:style-name="T1"> </text:span><text:span text:style-name="T2">(52/18) </text:span> ⲕⲉⲓ ⲛ̅ϭⲓ ⲡⲉⲡⲗⲏⲣⲱⲙⲁ ⲧⲏⲣ̅ϥ̅ ⲛ̅‐ <text:line-break/><text:span text:style-name="T1"> </text:span><text:span text:style-name="T2">(52/19) </text:span> ⲛ̅ⲟⲩⲟⲉⲓⲛ ⲁⲩⲡⲣⲟⲉⲗⲑⲉ ⲉⲃⲟⲗ ⲛ̅‐ <text:line-break/><text:span text:style-name="T1"> </text:span><text:span text:style-name="T2">(52/20) </text:span> ϭⲓ ⲛ̅〈ⲇⲓⲁⲕⲟⲛⲟⲥ〉 ⲡⲉϩⲟⲩⲉⲓⲧ%6 ⲡⲛⲟϭ <text:line-break/><text:span text:style-name="T1"> </text:span><text:span text:style-name="T2">(52/21) </text:span> ⲛ̅ⲅⲁⲙⲁⲗⲓⲏⲗ · ⲡⲉϩⲟⲩⲉⲓⲧ%6 ⲡⲛⲟϭ <text:line-break/><text:span text:style-name="T1"> </text:span><text:span text:style-name="T2">(52/22) </text:span> ⲛ̅ⲟⲩⲟⲉⲓⲛ ϩⲁⲣⲙⲟⲍⲏⲗ · ⲁⲩⲱ ⲡⲛⲟϭ <text:line-break/><text:span text:style-name="T1"> </text:span><text:span text:style-name="T2">(52/23) </text:span> ⲅ̅ⲁ̅ⲃ̅ⲣ̅ⲓ̅ⲏ̅ⲗ̅ · ⲡⲙⲉϩⲥⲛⲁⲩ ⲛ̅ⲛⲟϭ ⲛ̅‐ <text:line-break/><text:span text:style-name="T1"> </text:span><text:span text:style-name="T2">(52/24) </text:span> ⲟⲩⲟⲉⲓⲛ ⲟ̅ⲣ̅ⲟ̅ⲓ̅̈̅ⲁ̅ⲏ̅ⲗ̅ · ⲁⲩⲱ ⲡⲛⲟϭ <text:line-break/><text:span text:style-name="T1"> </text:span><text:span text:style-name="T2">(52/25) </text:span> ⲥ̅ⲁ̅ⲙ̅ⲗ̅ⲱ̅ · ⲙ̅ⲡⲛⲟϭ ⲛ̅ⲟⲩⲟⲉⲓⲛ ⲇⲁⲩ‐ <text:line-break/><text:span text:style-name="T1"> </text:span><text:span text:style-name="T2">(52/26) </text:span> ⲉⲓⲑⲉ · ⲁⲩⲱ ⲡⲛⲟϭ ⲁⲃⲣⲁⲥⲁⲝ · ⲛ̅‐ <text:line-break/><text:span text:style-name="T1"> </text:span><text:span text:style-name="T2">(53/1) </text:span> [ⲡⲛⲟϭ ⲛ̅ⲟⲩⲟⲉⲓⲛ] ⲏⲗⲉⲗⲏⲑ · ⲁⲩⲱ <text:line-break/><text:span text:style-name="T1"> </text:span><text:span text:style-name="T2">(53/2) </text:span> [ⲁⲛⲥⲩ]ⲛⲍⲩⲅⲟⲥ ⲛ̅ⲛⲁⲓ̈ ⲡⲣⲟⲉⲗⲑⲉ ⲉ‐ <text:line-break/><text:span text:style-name="T1"> </text:span><text:span text:style-name="T2">(53/3) </text:span> ⲃ̣ⲟⲗ ϩ̅ⲙ̅ ⲡⲟⲩⲱϣ ⲛ̅ⲧⲉⲩⲇⲟⲕⲓⲁ <text:line-break/><text:span text:style-name="T1"> </text:span><text:span text:style-name="T2">(53/4) </text:span> ⲙ̅ⲡⲉⲓⲱⲧ%6 ⲧⲉⲙⲛⲏⲙⲏ ⲙ̅ⲡⲛⲟϭ <text:line-break/><text:span text:style-name="T1"> </text:span><text:span text:style-name="T2">(53/5) </text:span> ⲡⲉϩⲟⲩⲉⲓⲧ%6 ⲅⲁⲙⲁⲗⲓⲏⲗ · ⲧⲁⲅⲁⲡⲏ <text:line-break/><text:span text:style-name="T1"> </text:span><text:span text:style-name="T2">(53/6) </text:span> ⲙ̅ⲡⲛⲟϭ ⲡⲙⲉϩⲥⲛⲁⲩ ⲅⲁⲃⲣⲓⲏⲗ <text:line-break/><text:span text:style-name="T1"> </text:span><text:span text:style-name="T2">(53/7) </text:span> ϯⲣⲏⲛⲏ ⲙ̅ⲡⲙⲉϩϣⲟⲙ̅ⲛ̅ⲧ%6 ⲡⲛⲟϭ <text:line-break/><text:span text:style-name="T1"> </text:span><text:span text:style-name="T2">(53/8) </text:span> ⲛ̅ⲥⲁⲙⲃⲗⲱ · ⲡⲱⲛϩ ⲛ̅ϣⲁ ⲉⲛⲉϩ· <text:line-break/><text:span text:style-name="T1"> </text:span><text:span text:style-name="T2">(53/9) </text:span> ⲙ̅ⲡⲛⲟϭ {ⲙ̅}ⲡⲙⲉϩϥⲧⲟⲟⲩ ⲁⲃⲣⲁ‐ <text:line-break/><text:span text:style-name="T1"> </text:span><text:span text:style-name="T2">(53/10) </text:span> ⲥⲁⲝ · ⲛ̅ⲧⲉⲉⲓϩⲉ ⲁⲩϫⲱⲕ ⲉⲃⲟⲗ ⲛ̅‐ <text:line-break/><text:span text:style-name="T1"> </text:span><text:span text:style-name="T2">(53/11) </text:span> ϭⲓ→ⲧ←ϯⲉ ⲛ̅ϩⲟⲅⲇⲟⲁⲥ ⲟⲩϩⲙ→ⲉ← ⲉⲥϫⲏⲕ ⲉ‐ <text:line-break/><text:span text:style-name="T1"> </text:span><text:span text:style-name="T2">(53/12) </text:span> ⲃⲟⲗ ⲛ̅ⲟⲩϭⲟⲙ ⲛ̅ⲁⲧⲟⲩⲁϩⲙⲉⲥ ⲧⲟ‐ <text:line-break/><text:span text:style-name="T1"> </text:span><text:span text:style-name="T2">(53/13) </text:span> ⲧⲉ ⲡⲛⲟϭ ⲛ̅ⲗⲟⲅⲟⲥ ⲡⲁⲩⲧⲟⲅⲉⲛⲏⲥ <text:line-break/><text:span text:style-name="T1"> </text:span><text:span text:style-name="T2">(53/14) </text:span> 〈ⲙ̅ⲛ̅〉 ⲡϣⲁϫⲉ ⲙ̅ⲡⲉⲡⲗⲏⲣⲱⲙⲁ <text:line-break/><text:span text:style-name="T1"> </text:span><text:span text:style-name="T2">(53/15) </text:span> ⲙ̅ⲡⲉϥⲧⲟⲟⲩ ⲛ̅ⲟⲩⲟⲉⲓⲛ ⲁⲩϯ ⲛ̅‐ <text:line-break/><text:span text:style-name="T1"> </text:span><text:span text:style-name="T2">(53/16) </text:span> ⲟⲩⲥⲙⲟⲩ ⲛ̅ⲡⲛⲟϭ ⲛ̅ⲁϩⲟⲣⲁⲧⲟⲛ <text:line-break/><text:span text:style-name="T1"> </text:span><text:span text:style-name="T2">(53/17) </text:span> ⲛ̅ⲡ̅ⲛ̅ⲁ̅ ⲛ̅ⲁⲕⲗⲏⲧⲟⲛ ⲛ̅ⲡⲁⲣⲑⲉⲛⲓ‐ <text:line-break/><text:span text:style-name="T1"> </text:span><text:span text:style-name="T2">(53/18) </text:span> ⲕⲟⲛ ⲙ̅ⲛ ⲧⲁⲣⲥⲉⲛⲓⲕⲏ ⲛ̅ⲡⲁⲣⲑⲉ‐ <text:line-break/><text:span text:style-name="T1"> </text:span><text:span text:style-name="T2">(53/19) </text:span> ⲛⲟⲥ ⲙ̅ⲛ̅ ⲡⲛⲟϭ ⲛ̅ⲇⲟⲝⲟⲙⲉⲇⲱⲛ <text:line-break/><text:span text:style-name="T1"> </text:span><text:span text:style-name="T2">(53/20) </text:span> ⲛ̅ⲁⲓⲱⲛ ⲙ̅ⲛ̅ ⲛⲉⲑⲣⲟⲛⲟⲥ ⲉⲧ̅ⲛ̅ϩⲏ‐ <text:line-break/><text:span text:style-name="T1"> </text:span><text:span text:style-name="T2">(53/21) </text:span> ⲧⲟⲩ ⲙ̅ⲛ̅ ⲛ̅ϭⲟⲙ ⲉⲧⲕⲱⲧⲉ ⲉⲣⲟⲟⲩ <text:line-break/><text:span text:style-name="T1"> </text:span><text:span text:style-name="T2">(53/22) </text:span> ⲙ̅ⲛ̅ ϩⲉⲛⲉⲟⲟⲩ ⲙ̅ⲛ̅ ϩⲉⲛⲉⲝⲟⲩⲥⲓⲁ <text:line-break/><text:span text:style-name="T1"> </text:span><text:span text:style-name="T2">(53/23) </text:span> ⲙ̅ⲛ̅ ⲛ̅ϭⲟⲙ ⲛ̅〈ⲛ〉 ⲡϣⲱⲙ̅ⲛ̅ⲧ%6 ⲛ̅ϩⲟⲟⲩⲧ%6 <text:line-break/><text:span text:style-name="T1"> </text:span><text:span text:style-name="T2">(53/24) </text:span> ⲛ̅ⲁⲗⲟⲩ ⲙ̅ⲛ̅ ⲧⲁⲣⲥⲉⲛⲓⲕⲏ ⲛ̅ⲡⲁⲣ‐ <text:line-break/><text:span text:style-name="T1"> </text:span><text:span text:style-name="T2">(53/25) </text:span> ⲑⲉⲛⲟⲥ ⲓ̅̈̅ⲟ̅ⲩ̅ⲏ̅ⲗ̅ ⲙ̅ⲛ̅ ⲏ̅ⲥⲏⲫⲏⲭ̅ <text:line-break/><text:soft-page-break/><text:span text:style-name="T1"> </text:span><text:span text:style-name="T2">(54/1) </text:span> ⲡⲉⲧⲉⲙⲁϩⲧⲉ ⲙ̅ⲡ̣ⲉ̣[ⲟ]ⲟ̣[ⲩ ⲡⲁⲗⲟⲩ] <text:line-break/><text:span text:style-name="T1"> </text:span><text:span text:style-name="T2">(54/2) </text:span> ⲙ̅ⲡⲁⲗⲟⲩ ⲙ̅ⲛ̅ ⲡⲉⲕⲗⲟⲙ ⲙ̅ⲡ̣ⲉ̣[ϥⲉ] <text:line-break/><text:span text:style-name="T1"> </text:span><text:span text:style-name="T2">(54/3) </text:span> ⲟⲟⲩ ⲡⲉⲡⲗⲏⲣⲱⲙⲁ ⲧⲏⲣ̅ϥ̅ · ⲙ̅ⲛ̅ ⲛⲓ‐ <text:line-break/><text:span text:style-name="T1"> </text:span><text:span text:style-name="T2">(54/4) </text:span> ⲉⲟⲟⲩ ⲧⲏⲣⲟⲩ ⲉⲧ̅ⲙ̅ⲙⲁⲩ ⲛⲓⲡⲗⲏ‐ <text:line-break/><text:span text:style-name="T1"> </text:span><text:span text:style-name="T2">(54/5) </text:span> ⲣⲱⲙⲁ ⲉⲧⲉ ⲙ̅ⲛ̅ ⲁⲣⲏϫⲟⲩ ⲙ̅〈ⲛ〉 ⲛⲓⲁⲓ‐ <text:line-break/><text:span text:style-name="T1"> </text:span><text:span text:style-name="T2">(54/6) </text:span> ⲱⲛ ⲛ̅ⲁⲧⲟⲛⲟⲙⲁⲍⲉ ⲙ̅ⲙⲟⲟⲩ ϫⲉ <text:line-break/><text:span text:style-name="T1"> </text:span><text:span text:style-name="T2">(54/7) </text:span> ⲕⲁⲁⲥ ⲉⲩⲛⲁϯ ⲣⲁⲛ ⲉⲡⲉⲓⲱⲧ%6 ϫⲉ <text:line-break/><text:span text:style-name="T1"> </text:span><text:span text:style-name="T2">(54/8) </text:span> ⲡⲙⲁϩ→ϥⲧⲟⲟⲩ← ⲡⲉ ⲙⲛ ⲧⲅⲉⲛ〈ⲉ〉ⲁ ⲛ̅‐ <text:line-break/><text:span text:style-name="T1"> </text:span><text:span text:style-name="T2">(54/9) </text:span> ⲁⲫⲑⲁⲣⲧⲟⲥ ⲉⲩⲉⲙⲟⲩⲧⲉ ⲉⲧⲉⲥⲡⲟ‐ <text:line-break/><text:span text:style-name="T1"> </text:span><text:span text:style-name="T2">(54/10) </text:span> ⲣⲁ ⲛ̅ⲡⲓⲱⲧ%6 ϫⲉ ⲧⲉⲥⲡⲟⲣⲁ ⲛ̅ⲡⲛⲟϭ <text:line-break/><text:span text:style-name="T1"> </text:span><text:span text:style-name="T2">(54/11) </text:span> ⲛ̅ⲥ̅ⲏ̅ⲑ̅ · ⲧⲟⲧⲉ ⲁⲩⲕⲓⲙ ⲛ̅ϭⲓ ⲛ̅ⲕⲁ‐ <text:line-break/><text:span text:style-name="T1"> </text:span><text:span text:style-name="T2">(54/12) </text:span> ⲛⲓⲙ · ⲁⲩⲱ ⲁⲡⲉⲥⲧⲱⲧ%6 ϫⲓ ⲛ̅ⲛⲓⲁ‐ <text:line-break/><text:span text:style-name="T1"> </text:span><text:span text:style-name="T2">(54/13) </text:span> ⲫⲑⲁⲣⲧⲟⲥ · ⲧⲟⲧⲉ ⲡϣⲟⲙ̅ⲛ̅ⲧ̅ ⲛ̅ϩⲟ‐ <text:line-break/><text:span text:style-name="T1"> </text:span><text:span text:style-name="T2">(54/14) </text:span> ⲟⲩⲧ%6 ⲛ̅ⲁⲗⲟⲩ ⲁⲩⲡⲣⲟⲉⲗⲑⲉ ⲉⲃⲟⲗ <text:line-break/><text:span text:style-name="T1"> </text:span><text:span text:style-name="T2">(54/15) </text:span> ϫⲓⲛ ⲛ̅ⲡⲥⲁϩⲣⲉ ϣⲁ ⲡⲉⲥⲏⲧⲉ ⲛ̅‐ <text:line-break/><text:span text:style-name="T1"> </text:span><text:span text:style-name="T2">(54/16) </text:span> ϩⲣⲁⲓ̈ ϩ̅ⲛ̅ ⲛⲁⲅⲉⲛⲛⲏⲧⲟⲥ ⲙ̅ⲛ̅ ⲛⲁⲩ‐ <text:line-break/><text:span text:style-name="T1"> </text:span><text:span text:style-name="T2">(54/17) </text:span> ⲧⲟⲅⲉⲛⲓⲟⲥ ⲙ̅ⲛ̅ ⲛⲉⲛⲧⲁⲩϫⲡⲟⲟⲩ <text:line-break/><text:span text:style-name="T1"> </text:span><text:span text:style-name="T2">(54/18) </text:span> ϩ̅ⲙ̅ ⲡⲅⲉⲛⲛⲏⲧⲟⲥ · ⲁⲥⲡⲣⲟⲉⲗⲑⲉ <text:line-break/><text:span text:style-name="T1"> </text:span><text:span text:style-name="T2">(54/19) </text:span> ⲉⲃⲟⲗ ⲛ̅ϭⲓ ϯⲙ̅ⲛ̅ⲧⲛⲟϭ ϯⲙ̅ⲛⲧ̅‐ <text:line-break/><text:span text:style-name="T1"> </text:span><text:span text:style-name="T2">(54/20) </text:span> ⲛⲟϭ ⲧⲏⲣⲥ ⲙ̅ⲡⲛⲟϭ ⲛ̅ⲭ̅ⲣ̅ⲥ̅ ⲁϥ‐ <text:line-break/><text:span text:style-name="T1"> </text:span><text:span text:style-name="T2">(54/21) </text:span> ⲧⲁϫⲣⲟ ⲛ̅ϩⲉⲛⲑⲣⲟⲛⲟⲥ ϩ̅ⲛ̅ ⲟⲩⲉⲟⲟⲩ <text:line-break/><text:span text:style-name="T1"> </text:span><text:span text:style-name="T2">(54/22) </text:span> ϩⲉⲛⲧⲃⲁ ⲉⲙ̅ⲛ̅ⲧⲟⲩ ⲏⲡⲉ ⲛ̅ϩⲣⲁⲓ̈ <text:line-break/><text:span text:style-name="T1"> </text:span><text:span text:style-name="T2">(54/23) </text:span> ϩ̅ⲙ̅ ⲡⲉϥⲧⲟⲟⲩ ⲛ̅ⲁⲓⲱⲛ ⲙ̅ⲡⲉⲩ‐ <text:line-break/><text:span text:style-name="T1"> </text:span><text:span text:style-name="T2">(54/24) </text:span> ⲕⲱⲧⲉ ϩⲉⲛⲧⲃⲁ ⲉⲙ̅ⲛ̅ⲧⲟⲩ ⲏⲡⲉ <text:line-break/><text:span text:style-name="T1"> </text:span><text:span text:style-name="T2">(54/25) </text:span> ϩⲉⲛⲇⲩⲛⲁⲙⲓⲥ ⲙ̅ⲛ̅ ϩⲉⲛⲉⲟⲟⲩ <text:line-break/><text:span text:style-name="T1"> </text:span><text:span text:style-name="T2">(55/1) </text:span> ⲙ̅ⲛ̅ ⲉⲛⲁⲫⲑⲁⲣⲥ̣ⲓⲁ · ⲁⲩⲱ ⲁⲩⲡⲣⲟⲉⲗ <text:line-break/><text:span text:style-name="T1"> </text:span><text:span text:style-name="T2">(55/2) </text:span> ⲑⲉ ⲉⲃⲟⲗ ⲛ̅ⲧⲉⲓϩⲉ · ⲑⲩⲱ ⲁⲥⲁϣⲁⲉⲓ ⲛ̅‐ <text:line-break/><text:span text:style-name="T1"> </text:span><text:span text:style-name="T2">(55/3) </text:span> ϭⲓ ϯⲁ〈ⲫⲑ〉ⲁⲣⲧⲟⲥ ⲛ̅ⲡⲛⲉⲩⲙⲁⲧⲓⲕⲏ <text:line-break/><text:span text:style-name="T1"> </text:span><text:span text:style-name="T2">(55/4) </text:span> ⲛ̅ⲉⲕⲕⲗⲏⲥⲓⲁ ⲛ̅ϩⲣⲁⲓ̈ ϩ̅ⲙ̅ ⲡⲉϥⲧⲟⲟⲩ ⲛ̅‐ <text:line-break/><text:span text:style-name="T1"> </text:span><text:span text:style-name="T2">(55/5) </text:span> ⲟⲩⲟⲉⲓⲛ ⲙ̅ⲡⲛⲟϭ ⲛ̅ⲁⲩⲧⲟⲅⲉⲛⲏⲥ ⲉ‐ <text:line-break/><text:span text:style-name="T1"> </text:span><text:span text:style-name="T2">(55/6) </text:span> ⲧⲟⲛϩ ⲡⲛⲟⲩⲧⲉ ⲛ̅ⲧⲙⲏⲉ ⲉⲩⲥⲙⲟⲩ <text:line-break/><text:span text:style-name="T1"> </text:span><text:span text:style-name="T2">(55/7) </text:span> ⲉⲩϩⲱⲥ ⲉⲩϯ ⲉⲟⲟⲩ ϩ̅ⲛ̅ ⲟⲩⲥⲙⲏ ⲛ̅‐ <text:line-break/><text:span text:style-name="T1"> </text:span><text:span text:style-name="T2">(55/8) </text:span> ⲟⲩⲱⲧ%6 ϩ̅ⲛ̅ ⲟⲩϩⲓⲕⲱⲛ ϩ̅ⲛ̅ ⲟⲩⲧⲁⲡⲣⲟ <text:line-break/><text:span text:style-name="T1"> </text:span><text:span text:style-name="T2">(55/9) </text:span> ⲉⲙⲉⲥⲙ̅ⲧⲟⲛ ⲙ̅ⲙⲟⲥ ⲉⲡⲉⲓⲱⲧ%6 ⲙ̅ⲛ̅ <text:line-break/><text:span text:style-name="T1"> </text:span><text:span text:style-name="T2">(55/10) </text:span> ⲧⲙⲁⲁⲩ ⲙ̅ⲛ̅ ⲡϣⲏⲣⲉ ⲙ̅ⲛ̅ ⲡⲉⲩⲡⲗⲏ <text:line-break/><text:span text:style-name="T1"> </text:span><text:span text:style-name="T2">(55/11) </text:span> ⲣⲱⲙⲁ ⲧⲏⲣ̅ϥ̅ · ⲛ̅ⲑⲉ ⲛ̅ⲧⲁⲉⲓϫⲟⲟⲥ ⲛ̅‐ <text:line-break/><text:span text:style-name="T1"> </text:span><text:span text:style-name="T2">(55/12) </text:span> ⲧϯⲉ ⲛ̅ⲥⲫⲣⲁⲅⲓⲥ ⲉⲧⲉ ⲛⲁ ⲛⲓⲧⲃⲁ ⲙ̅ⲛ̅ <text:line-break/><text:span text:style-name="T1"> </text:span><text:span text:style-name="T2">(55/13) </text:span> ⲛⲉⲧⲁⲣⲭⲓ ⲉϫ̅ⲛ̅ ⲛⲓⲁⲓⲱⲛ ⲙ̅ⲛ̅ ⲛⲉⲧ‐ <text:line-break/><text:span text:style-name="T1"> </text:span><text:span text:style-name="T2">(55/14) </text:span> ⲫⲟⲣⲉⲓ ⲙ̅ⲡⲉⲟⲟⲩ ⲛ̅ⲛⲓⲥⲧⲣⲁ〈ⲧ〉ⲏ〈ⲅ〉ⲟⲥ <text:line-break/><text:span text:style-name="T1"> </text:span><text:span text:style-name="T2">(55/15) </text:span> ⲁⲩϯ 〈ⲛⲁⲩ〉 ⲛ̅ⲧⲉⲡⲓⲧⲣⲟⲡⲏ ⲉⲟⲩⲱⲛϩ ⲉⲃⲟⲗ <text:line-break/><text:span text:style-name="T1"> </text:span><text:span text:style-name="T2">(55/16) </text:span> ⲛ̅ⲛⲉⲧ̅ⲙ̅ⲡϣⲁ ϩⲁⲙⲏⲛ · ⲧⲟⲧⲉ ⲡⲛⲟϭ <text:line-break/><text:span text:style-name="T1"> </text:span><text:span text:style-name="T2">(55/17) </text:span> ⲛ̅ⲥⲏⲑ · ⲡϣⲏⲣⲉ ⲙ̅ⲡⲁⲫⲑⲁⲣⲧⲟⲥ ⲛ̅‐ <text:line-break/><text:span text:style-name="T1"> </text:span><text:span text:style-name="T2">(55/18) </text:span> ⲣⲱⲙⲉ ⲁⲇⲁⲙⲁⲥ ⲁϥϯ ⲛ̅ⲟⲩⲥⲙⲟⲩ <text:line-break/><text:span text:style-name="T1"> </text:span><text:span text:style-name="T2">(55/19) </text:span> ⲙ̅ⲡⲛⲟϭ ⲛ̅ⲁϩⲟⲣⲁⲧⲟⲥ ⲛ̅ⲛⲁⲕⲗⲏⲧⲟⲥ <text:line-break/><text:span text:style-name="T1"> </text:span><text:span text:style-name="T2">(55/20) </text:span> ⲛ̅ⲁⲧⲟⲛⲟⲙⲁⲍⲉ ⲙ̅ⲙⲟϥ ⲙ̅ⲡⲁⲣⲑⲉ‐ <text:line-break/><text:span text:style-name="T1"> </text:span><text:span text:style-name="T2">(55/21) </text:span> ⲛⲓⲕⲟⲛ ⲙ̅ⲡ̅ⲛ̅ⲁ̅ ⲙ̅ⲛ̅ ⲧ〈ⲁⲣⲥ〉ⲉⲛⲓⲕⲏ <text:line-break/><text:span text:style-name="T1"> </text:span><text:span text:style-name="T2">(55/22) </text:span> 〈ⲛ̅ⲡⲁⲣⲑⲉⲛⲟⲥ ⲙ̅ⲛ̅ ⲡϣⲟⲙ̅ⲛⲧ̅ ⲛ̅‐ <text:line-break/><text:soft-page-break/><text:span text:style-name="T1"> </text:span><text:span text:style-name="T2">(55/23) </text:span> ϩⲟⲟⲩⲧ%6 ⲛ̅ⲁⲗⲟⲩ ⲙ̅ⲛ̅ ⲧⲁⲣⲥⲉⲛⲓⲕⲏ〉 <text:line-break/><text:span text:style-name="T1"> </text:span><text:span text:style-name="T2">(55/24) </text:span> ⲛ̅ⲡⲁⲣⲑⲉⲛⲟⲥ ⲓ̈ⲟⲩⲏⲗ ⲙ̅ⲛ̅ ⲏⲥⲏⲫⲏⲭ <text:line-break/><text:span text:style-name="T1"> </text:span><text:span text:style-name="T2">(55/25) </text:span> ⲡⲉⲧⲉⲙⲁϩⲧⲉ ⲙ̅ⲡⲉⲟⲟⲩ ⲙ̅ⲛ̅ ⲡⲉ <text:line-break/><text:span text:style-name="T1"> </text:span><text:span text:style-name="T2">(55/26) </text:span> ⲕⲗⲟⲙ ⲙ̅ⲡⲉϥⲉⲟⲟⲩ ⲡⲁⲗⲟⲩ ⲙ̅ⲡⲁⲗⲟⲩ <text:line-break/><text:span text:style-name="T1"> </text:span><text:span text:style-name="T2">(56/1) </text:span> ⲙ̅ⲛ̅ ⲛ̅ⲛⲟϭ ⲛ̅ⲇⲟⲝⲟⲙⲉⲇⲱⲛ ⲛ̅ⲁⲓⲱ̣[ⲛ] <text:line-break/><text:span text:style-name="T1"> </text:span><text:span text:style-name="T2">(56/2) </text:span> ⲙ̅ⲛ̅ ⲡⲉⲡⲗⲏⲣⲱⲙⲁ ⲛ̅ⲧⲁⲉⲓϫⲟⲟϥ ⲛ̣̅‐ <text:line-break/><text:span text:style-name="T1"> </text:span><text:span text:style-name="T2">(56/3) </text:span> ϣⲟⲣⲡ%6 ⲙ̅ⲛ̅ ⲧⲉϥⲥⲡⲟⲣⲁ ⲁϥⲁⲓ→ⲧⲓ← ⲙ̅ⲙⲟⲥ <text:line-break/><text:span text:style-name="T1"> </text:span><text:span text:style-name="T2">(56/4) </text:span> ⲧⲟⲧⲉ ⲁⲥⲉⲓ ⲉⲃⲟⲗ ϩ̅ⲙ̅ ⲡⲙⲁ ⲉⲧ̅ⲙ̅ⲙⲁⲩ <text:line-break/><text:span text:style-name="T1"> </text:span><text:span text:style-name="T2">(56/5) </text:span> ⲛ̅ϭⲓ ⲧⲛⲟϭ ⲛ̅ⲇⲩⲛⲁⲙⲓⲥ ⲙ̅ⲡⲛⲟϭ ⲛ̅‐ <text:line-break/><text:span text:style-name="T1"> </text:span><text:span text:style-name="T2">(56/6) </text:span> ⲟⲩⲟⲉⲓⲛ ⲡⲗⲏⲥⲓⲑⲉⲁ ⲧⲙⲉⲉⲩ ⲛ̅ⲛ̅ⲁⲅ%6 <text:line-break/><text:span text:style-name="T1"> </text:span><text:span text:style-name="T2">(56/7) </text:span> ⲅⲉⲗⲟⲥ ⲧⲙⲉⲉⲩⲉ ⲛ̅ⲛ̅ⲟⲩⲟⲉⲓⲛ ⲧⲙⲉ <text:line-break/><text:span text:style-name="T1"> </text:span><text:span text:style-name="T2">(56/8) </text:span> ⲉⲩⲉ ⲉⲑⲁⲉⲟⲟⲩ · ⲧⲡⲁⲣⲑⲉⲛⲟⲥ ⲧⲁ ⲧⲉ‐ <text:line-break/><text:span text:style-name="T1"> </text:span><text:span text:style-name="T2">(56/9) </text:span> ϥⲧⲟ ⲛ̅ⲕⲓⲃⲉ ⲉⲥⲉⲓⲛⲉ ⲛ̅ⲡⲕⲁⲣⲡⲟⲥ ⲉ‐ <text:line-break/><text:span text:style-name="T1"> </text:span><text:span text:style-name="T2">(56/10) </text:span> ⲃⲟⲗ ϩ̅ⲛ̅ ⲅⲟⲙⲟⲣⲣⲁ ⲛ̅ⲡⲏⲅⲏ ⲙ̅ⲛ̅ ⲥⲟ‐ <text:line-break/><text:span text:style-name="T1"> </text:span><text:span text:style-name="T2">(56/11) </text:span> ⲇⲟⲙⲁ ⲉⲧⲉ ⲡⲕⲁⲣⲡⲟⲥ ⲛ̅ⲧⲡⲏⲅⲏ ⲛ̅‐ <text:line-break/><text:span text:style-name="T1"> </text:span><text:span text:style-name="T2">(56/12) </text:span> ⲅⲟⲙⲟⲣⲣⲁ ⲉⲧ̅ⲛ̅ϩⲏⲧ̅ⲥ̅ · ⲁⲥⲉⲓ ⲉⲃⲟⲗ <text:line-break/><text:span text:style-name="T1"> </text:span><text:span text:style-name="T2">(56/13) </text:span> ϩⲓⲧⲟⲟⲧ̅ϥ̅ ⲙ̅ⲡⲛⲟϭ ⲛ̅ⲥⲏⲑ · ⲧⲟⲧⲉ <text:line-break/><text:span text:style-name="T1"> </text:span><text:span text:style-name="T2">(56/14) </text:span> ⲡⲛⲟϭ ⲛ̅ⲥⲏⲑ · ⲁϥⲧⲉⲗⲏⲗ ⲉϩⲣⲁⲓ̈ ⲉϫ̅ⲙ̅ <text:line-break/><text:span text:style-name="T1"> </text:span><text:span text:style-name="T2">(56/15) </text:span> ⲡⲉϩⲙⲟⲧ%6 ⲛ̅ⲧⲁⲩⲭⲁⲣⲓⲍⲉ ⲙ̅ⲙⲟϥ ⲛⲁϥ <text:line-break/><text:span text:style-name="T1"> </text:span><text:span text:style-name="T2">(56/16) </text:span> ⲉⲃⲟⲗ ϩⲓⲧⲟⲟⲧ̅ϥ̅ ⲙ̅ⲡⲁⲫⲑⲁⲣⲧⲟⲥ ⲛ̅‐ <text:line-break/><text:span text:style-name="T1"> </text:span><text:span text:style-name="T2">(56/17) </text:span> ⲁⲗⲟⲩ ⲁϥϫⲓ ⲛ̅ⲧⲉϥⲥⲡⲟⲣⲁ ⲉⲃⲟⲗ <text:line-break/><text:span text:style-name="T1"> </text:span><text:span text:style-name="T2">(56/18) </text:span> ϩⲓⲧⲟⲟⲧ̅ⲥ̅ ⲛ̅ⲧⲁ ⲧⲉϥⲧⲟ ⲛ̅ⲕⲓⲃⲉ ⲧⲡⲁⲣ‐ <text:line-break/><text:span text:style-name="T1"> </text:span><text:span text:style-name="T2">(56/19) </text:span> ⲑⲉⲛⲟⲥ ⲁϥⲧⲁϩⲟ ⲙ̅ⲙⲟⲥ ⲉⲣⲁⲧ̅[̅2̅ⲥ̅〉 ⲛ̅ⲙ̅ <text:line-break/><text:span text:style-name="T1"> </text:span><text:span text:style-name="T2">(56/20) </text:span> ⲙⲁϥ ⲛ̅ϩⲣⲁⲓ̈ ϩ̅ⲛ̅ ⲡⲙⲉϩϥⲧⲟⲟⲩ ⲛ̅ⲁⲓ <text:line-break/><text:span text:style-name="T1"> </text:span><text:span text:style-name="T2">(56/21) </text:span> ⲱⲛ ϩ̅ⲙ̅ ⲡⲙⲉϩϣⲟⲙ̅ⲛⲧ̅ ⲛ̅ⲛⲟϭ ⲛ̅‐ <text:line-break/><text:span text:style-name="T1"> </text:span><text:span text:style-name="T2">(56/22) </text:span> ⲟⲩⲟⲉⲓⲛ ⲇⲁⲩⲉⲓⲑⲉ ⲙ̅ⲛ̅ⲛ̅ⲥⲁ ϯⲟⲩ <text:line-break/><text:span text:style-name="T1"> </text:span><text:span text:style-name="T2">(56/23) </text:span> ⲛ̅ϣⲟ ⲛ̅ⲣⲟⲙⲡⲉ ⲡⲉϫⲁϥ ⲛ̅ϭⲓ ⲡⲛⲟϭ <text:line-break/><text:span text:style-name="T1"> </text:span><text:span text:style-name="T2">(56/24) </text:span> ⲛ̅ⲟⲩⲟⲉⲓⲛ ⲏⲗⲉⲗⲏⲑ · ϫⲉ ⲙⲁⲣⲉⲟⲩⲁ ⲣ̅‐ <text:line-break/><text:span text:style-name="T1"> </text:span><text:span text:style-name="T2">(56/25) </text:span> ⲣ̅ⲣⲟ ⲉϫ̅ⲙ̅ ⲡⲉⲭⲁⲟⲥ ⲙ̅ⲛ̅ ⲁⲙ̅ⲛ̅ⲧⲉ · <text:line-break/><text:span text:style-name="T1"> </text:span><text:span text:style-name="T2">(56/26) </text:span> ⲁⲩⲱ ⲁⲥⲟⲩⲱⲛϩ ⲉⲃⲟⲗ ⲛ̅ϭⲓ ⲟⲩϭⲏⲡⲉ <text:line-break/><text:span text:style-name="T1"> </text:span><text:span text:style-name="T2">(57/1) </text:span> [ⲉⲧⲉⲡⲉⲥⲣⲁⲛ ⲡ]ⲉ ϩⲩⲗⲓⲕⲏ ⲥⲟⲫⲓⲁ <text:line-break/><text:span text:style-name="T1"> </text:span><text:span text:style-name="T2">(57/2) </text:span> [........ⲁⲥ]ϭⲱϣⲧ%6 ⲉⲃⲟⲗ ⲉⲛⲙⲉ <text:line-break/><text:span text:style-name="T1"> </text:span><text:span text:style-name="T2">(57/3) </text:span> [ⲣⲟⲥ ⲙ̅ⲡⲉⲭⲁⲟⲥ] ⲉⲣⲉⲡⲉⲥϩⲟ ⲟ ⲛ̅ⲑⲉ ⲛ̅‐ <text:line-break/><text:span text:style-name="T1"> </text:span><text:span text:style-name="T2">(57/4) </text:span> [.........ϩ̅]̅ⲙ̅ ⲡⲉⲥⲥⲙⲟⲧ ⲛⲉϥ <text:line-break/><text:span text:style-name="T1"> </text:span><text:span text:style-name="T2">(57/5) </text:span> [.........]ⲥ̣ⲛⲟϥ · ⲁⲩⲱ ⲡⲉϫⲁϥ <text:line-break/><text:span text:style-name="T1"> </text:span><text:span text:style-name="T2">(57/6) </text:span> [ⲛ̅ϭⲓ ⲡⲛⲟϭ ⲛ̅ⲁ]ⲅ̣%6ⲅⲉ̣ⲗⲟⲥ ⲅⲁⲙⲁⲗⲓⲏⲗ · <text:line-break/><text:span text:style-name="T1"> </text:span><text:span text:style-name="T2">(57/7) </text:span> [ⲙ̅ⲡⲛⲟϭ ⲅⲁⲃⲣⲓⲏ]ⲗ̣ · ⲡⲇⲓⲁⲕⲱⲛ ⲙ̅‐ <text:line-break/><text:span text:style-name="T1"> </text:span><text:span text:style-name="T2">(57/8) </text:span> [ⲡⲛⲟϭ ⲙ̅ⲫⲱⲥⲧ]ⲏⲣ · ⲟ̅ⲣ̅ⲟ̅ⲓ̅̈̅ⲁ̅ⲏ̅ⲗ̅ · ⲡⲉ <text:line-break/><text:span text:style-name="T1"> </text:span><text:span text:style-name="T2">(57/9) </text:span> [ϫⲁϥ ϫⲉ ⲙⲁⲣⲉⲩ]ⲁⲅ%3ⲅⲉⲗⲟⲥ ⲉⲓ ⲉⲃⲟⲗ <text:line-break/><text:span text:style-name="T1"> </text:span><text:span text:style-name="T2">(57/10) </text:span> [ϫⲉⲕⲁⲁⲥ ⲉϥⲉⲣ̅ ⲣ̅]ⲣⲟ ⲉϫ̅ⲙ̅ ⲡⲉⲭⲁⲟⲥ <text:line-break/><text:span text:style-name="T1"> </text:span><text:span text:style-name="T2">(57/11) </text:span> [ⲙ̅ⲛ̅ ⲁⲙ̅ⲛ̅ⲧⲉ · ⲧ]ⲟ̣ⲧⲉ ⲧϭⲏⲡ→ⲉ← ⲉⲥⲙⲁ <text:line-break/><text:span text:style-name="T1"> </text:span><text:span text:style-name="T2">(57/12) </text:span> [ⲧⲱⲟⲩ ⲁⲥⲉⲓ ⲉⲃⲟ]ⲗ̣ ϩ̅ⲛ̅ ⲧⲙⲟⲛⲁⲥ ⲥ̅ⲛ̅ⲧⲉ <text:line-break/><text:span text:style-name="T1"> </text:span><text:span text:style-name="T2">(57/13) </text:span> [ⲉⲩⲛ̅ⲧⲉ ⲧⲟⲩⲉⲓ ⲧ]ⲟⲩⲉⲓ ⲛ̅ⲟⲩⲟⲉⲓⲛ · ⲛ̅‐ <text:line-break/><text:span text:style-name="T1"> </text:span><text:span text:style-name="T2">(57/14) </text:span> [......ⲑⲣⲟⲛ]ⲟⲥ ⲡⲉⲛⲧⲁⲥⲧⲁϩⲟϥ <text:line-break/><text:span text:style-name="T1"> </text:span><text:span text:style-name="T2">(57/15) </text:span> [ⲉⲣⲁⲧ̅ϥ̅ ⲛ̅ϩⲣⲁⲓ̈] ϩ̅ⲛ̅ ⲧϭⲏⲡⲉ ⲙ̅ⲡⲥⲁ〈ϩ〉 <text:line-break/><text:span text:style-name="T1"> </text:span><text:span text:style-name="T2">(57/16) </text:span> [ⲣⲉ · ⲧⲟⲧⲉ ⲁϥⲛ]ⲁ̣ⲩ ⲛ̅ϭⲓ ⲥⲁⲕⲗⲁ ⲡⲛⲟϭ <text:line-break/><text:span text:style-name="T1"> </text:span><text:span text:style-name="T2">(57/17) </text:span> [ⲛ̅ⲁⲅ%6ⲅⲉⲗⲟⲥ ⲉ]ⲡ̣ⲛⲟϭ ⲛ̅ⲇⲁⲓⲙⲱⲛ ⲉ‐ <text:line-break/><text:soft-page-break/><text:span text:style-name="T1"> </text:span><text:span text:style-name="T2">(57/18) </text:span> [ⲧ̅ⲛ̅ⲙ̅ⲙⲁϥ ⲛⲉⲃⲣ]ⲟ̣ⲩⲏⲗ· ⲁⲩⲱ ⲁⲩϣⲱⲡⲉ <text:line-break/><text:span text:style-name="T1"> </text:span><text:span text:style-name="T2">(57/19) </text:span> [ⲛ̅ⲙ̅ⲙⲁⲩ ⲛ̅ⲟⲩ]ⲡ̣̅ⲛⲁ̅ ⲛ̅ϫⲡⲟ ⲛ̅ⲧⲉ ⲡⲕⲁϩ‐ <text:line-break/><text:span text:style-name="T1"> </text:span><text:span text:style-name="T2">(57/20) </text:span> [ⲁⲩϫⲡⲟ ⲛ̅ϩⲉⲛ]ⲁⲅ%6ⲅⲉⲗⲟⲥ ⲉⲩⲡⲁⲣⲁⲥ <text:line-break/><text:span text:style-name="T1"> </text:span><text:span text:style-name="T2">(57/21) </text:span> [ⲧⲁⲧⲉⲓ· ⲡⲉϫⲁϥ] ⲛ̅ϭⲓ ⲥⲁⲕⲗⲁ ⲙ̅ⲡⲛⲟϭ <text:line-break/><text:span text:style-name="T1"> </text:span><text:span text:style-name="T2">(57/22) </text:span> [ⲛ̅ⲇⲁⲓⲙⲱⲛ ⲛⲉⲃ]ⲣⲟⲩⲏⲗ · ϫⲉ ⲙⲁⲣⲟⲩϣⲱ <text:line-break/><text:span text:style-name="T1"> </text:span><text:span text:style-name="T2">(57/23) </text:span> [ⲡⲉ ⲛ̅ϭⲓ ⲡⲙ̅ⲛ̅ⲧ̅ⲥ̅]ⲛ̣ⲟⲟⲩⲥ ⲛ̅ⲁⲓⲱⲛ ϩ̅ⲙ̅ <text:line-break/><text:span text:style-name="T1"> </text:span><text:span text:style-name="T2">(57/24) </text:span> [ⲡ.........]ⲁⲓⲱⲛ ϩ̅ⲛ̅ⲕⲟⲥⲙⲟⲥ ⲛ̅‐ <text:line-break/><text:span text:style-name="T1"> </text:span><text:span text:style-name="T2">(57/25) </text:span> [.................ⲡⲉ]ϫ̣ⲁϥ ⲛ̅ϭⲓ ⲡⲛⲟϭ ⲛ̅ⲁⲅ‐ <text:line-break/><text:span text:style-name="T1"> </text:span><text:span text:style-name="T2">(57/26) </text:span> [ⲅⲉⲗⲟⲥ ⲥⲁⲕⲗⲁ] ϩ̅ⲙ̅ ⲡⲟⲩⲱϣ ⲙ̅ⲡⲁⲩⲧⲟ‐ <text:line-break/><text:span text:style-name="T1"> </text:span><text:span text:style-name="T2">(58/1) </text:span> ⲅⲉⲛⲏⲥ ϫⲉ ⲉⲣⲉⲡⲉ[ <text:line-break/><text:span text:style-name="T1"> </text:span><text:span text:style-name="T2">(58/2) </text:span> ⲛ̅ⲧⲏⲡⲉ ⲛ̅ⲥⲁϣϥ[ <text:line-break/><text:span text:style-name="T1"> </text:span><text:span text:style-name="T2">(58/3) </text:span> ⲁⲩⲱ ⲡⲉϫⲁϥ ⲛ̅ⲛ[ⲓⲛⲟϭ ⲛ̅ⲁⲅ%6ⲅⲉⲗⲟⲥ] <text:line-break/><text:span text:style-name="T1"> </text:span><text:span text:style-name="T2">(58/4) </text:span> ϫⲉ ⲙⲁϣⲉ ⲛⲏⲧ̅ⲛ̅ ⲛ̅[ⲧⲉⲡⲟⲩⲁ ⲡⲟⲩⲁ] <text:line-break/><text:span text:style-name="T1"> </text:span><text:span text:style-name="T2">(58/5) </text:span> ⲙ̅ⲙⲱⲧ̅ⲛ̅ 〈ⲣ̅〉ⲣ̅ⲣⲟ ⲉⲡⲉϥ̣[ⲕⲟⲥⲙⲟⲥ · ⲁⲩ] <text:line-break/><text:span text:style-name="T1"> </text:span><text:span text:style-name="T2">(58/6) </text:span> ϣⲉ ⲛ̅ϭⲓ ⲡⲟⲩⲁ ⲡⲟⲩ̣[ⲁ ⲉⲃⲟⲗ ϩ̅ⲛ̅ ⲡⲉⲉⲓ] <text:line-break/><text:span text:style-name="T1"> </text:span><text:span text:style-name="T2">(58/7) </text:span> ⲙ̅ⲛ̅ⲧ̅ⲥ̅ⲛⲟⲟⲩⲥ ⲛ̅[ⲁⲅ%6ⲅⲉⲗⲟⲥ · ⲡϣⲟⲣⲡ%6] <text:line-break/><text:span text:style-name="T1"> </text:span><text:span text:style-name="T2">(58/8) </text:span> ⲛ̅ⲁⲅ%6ⲅⲉⲗⲟⲥ ⲡⲉ ⲁⲑ̣[ⲱⲑ ⲡⲁⲓ̈ ϩⲱⲱϥ] <text:line-break/><text:span text:style-name="T1"> </text:span><text:span text:style-name="T2">(58/9) </text:span> ⲡⲉⲧⲟⲩⲙⲟⲩⲧⲉ ⲉⲣ[ⲟϥ ⲛ̅ϭⲓ ⲛ̅ⲛⲟϭ ⲛ̅ⲅⲉ]‐ <text:line-break/><text:span text:style-name="T1"> </text:span><text:span text:style-name="T2">(58/10) </text:span> ⲛⲉⲁ ⲛ̅ⲛ̅ⲣⲱⲙⲉ ϫⲉ [.......· ⲡⲙⲉϩ]‐ <text:line-break/><text:span text:style-name="T1"> </text:span><text:span text:style-name="T2">(58/11) </text:span> ⲥⲛⲁⲩ ⲡⲉ ϩⲁⲣⲙⲁⲥ [ⲉⲧⲉ ⲡⲃⲁⲗ ⲙ̅ⲡⲕⲱϩⲧ%6] <text:line-break/><text:span text:style-name="T1"> </text:span><text:span text:style-name="T2">(58/12) </text:span> ⲡⲉ ⲡⲙⲉϩϣⲟⲙ̅ⲛ̅[̅ⲧ̅ ⲡⲉ ⲅⲁⲗⲓⲗⲁ ⲡⲙⲉϩ]‐ <text:line-break/><text:span text:style-name="T1"> </text:span><text:span text:style-name="T2">(58/13) </text:span> ϥⲧⲟⲟⲩ ⲡⲉ ⲓ̈ⲱⲃⲏⲗ [ⲡⲙⲉϩϯⲟⲩ ⲡⲉ ⲁ]‐ <text:line-break/><text:span text:style-name="T1"> </text:span><text:span text:style-name="T2">(58/14) </text:span> ⲇⲱⲛⲁⲓⲟⲥ ⲡⲉⲧⲟⲩⲙ[ⲟⲩⲧⲉ ⲉⲣⲟϥ ϫⲉ ⲥⲁ]‐ <text:line-break/><text:span text:style-name="T1"> </text:span><text:span text:style-name="T2">(58/15) </text:span> ⲃⲁⲱⲑ· ⲡⲙⲉϩⲥⲟⲟⲩ [ⲡⲉ ⲕⲁⲓ̈ⲛ ⲡⲉⲧⲟⲩ]‐ <text:line-break/><text:span text:style-name="T1"> </text:span><text:span text:style-name="T2">(58/16) </text:span> ⲙⲟⲩⲧⲉ ⲉⲣⲟϥ ⲛ̅ϭⲓ ⲛ̅[ⲛⲟϭ ⲛ̅ⲅⲉⲛⲉⲁ ⲛ̅]‐ <text:line-break/><text:span text:style-name="T1"> </text:span><text:span text:style-name="T2">(58/17) </text:span> ⲣ̅ⲣⲱⲙⲉ ϫⲉ ⲡⲣⲏ ⲡ[ⲙⲉϩⲥⲁϣ̅ϥ̅ ⲡⲉ ⲁⲃⲉⲗ ·] <text:line-break/><text:span text:style-name="T1"> </text:span><text:span text:style-name="T2">(58/18) </text:span> ⲡⲙⲉϩϣⲏ̅ ⲁⲕⲓⲣⲉⲥⲥⲓⲛⲁ ⲡ̣[ⲙⲉϩⲯⲓⲥ ⲓ̈ⲟⲩⲃⲏⲗ ·] <text:line-break/><text:span text:style-name="T1"> </text:span><text:span text:style-name="T2">(58/19) </text:span> ⲡⲙⲉϩⲙⲏⲧ%6 ⲡⲉ ϩⲁⲣⲙ̣[ⲟⲩⲡⲓⲁⲏⲗ · ⲡⲙⲉϩ]‐ <text:line-break/><text:span text:style-name="T1"> </text:span><text:span text:style-name="T2">(58/20) </text:span> ⲙ̅ⲛ̅ⲧⲟⲩⲏⲉ ⲡⲉ ⲁⲣⲭ[ⲉⲓⲣ ⲁⲇⲱⲛⲉⲓⲛ] <text:line-break/><text:span text:style-name="T1"> </text:span><text:span text:style-name="T2">(58/21) </text:span> ⲡⲙⲉϩⲙ̅ⲛ̅ⲧ̅ⲥ̅ⲛⲟⲟⲩ[ⲥ ⲡⲉ ⲃⲉⲗⲓⲁⲥ ⲛⲉ]‐ <text:line-break/><text:span text:style-name="T1"> </text:span><text:span text:style-name="T2">(58/22) </text:span> ⲉⲓ ⲛⲉⲧϩⲓϫ̅ⲛ̅ ⲁⲙⲛ̅ⲧ[ⲉ ⲙⲛ ⲡⲉⲭⲁⲟⲥ ·] <text:line-break/><text:span text:style-name="T1"> </text:span><text:span text:style-name="T2">(58/23) </text:span> ⲁⲩⲱ ⲙ̅ⲛ̅ⲛ̅ⲥⲁ ⲡⲥⲁⲃⲧ̣[ⲉ ⲙ̅ⲡⲕⲟⲥⲙⲟⲥ] <text:line-break/><text:span text:style-name="T1"> </text:span><text:span text:style-name="T2">(58/24) </text:span> ⲡⲉϫⲉ ⲥⲁⲕⲗⲁ ⲛ̅ⲛⲉϥⲁ̣[ⲅ%6ⲅⲉⲗⲟⲥ ϫⲉ ⲁ]‐ <text:line-break/><text:span text:style-name="T1"> </text:span><text:span text:style-name="T2">(58/25) </text:span> ⲛⲟⲕ ⲁⲛⲟⲕ ⲟⲩⲛⲟⲩ[ⲧⲉ ⲛ̅ⲣⲉϥⲕⲱϩ] <text:line-break/><text:span text:style-name="T1"> </text:span><text:span text:style-name="T2">(58/26) </text:span> ⲁⲩⲱ ⲁϫ̅ⲛ̅ⲧ%6 ⲙ̅ⲡⲉⲗⲁⲁ[ⲩ ϣⲱⲡⲉ ⲉϥⲡⲓ]‐ <text:line-break/><text:span text:style-name="T1"> </text:span><text:span text:style-name="T2">(59/1) </text:span> ⲑⲉ ⲉⲧⲉϥϩⲩⲡⲟⲥⲧⲁⲥⲓⲥ ⲧⲟⲧⲉ ⲟⲩⲥⲙⲏ‐ <text:line-break/><text:span text:style-name="T1"> </text:span><text:span text:style-name="T2">(59/2) </text:span> ⲁⲥⲉⲓ̣ ϩⲓ ⲡϫⲓⲥⲉ ⲉⲥϫⲱ ⲙ̅ⲙⲟⲥ ϫⲉ ϥϣⲟ‐ <text:line-break/><text:span text:style-name="T1"> </text:span><text:span text:style-name="T2">(59/3) </text:span> ⲟⲡ%6 ⲛ̅ϭⲓ ⲡⲣⲱⲙⲉ ⲙ̅ⲛ̅ ⲡϣⲏⲣⲉ ⲛ̅ⲡⲣⲱ‐ <text:line-break/><text:span text:style-name="T1"> </text:span><text:span text:style-name="T2">(59/4) </text:span> ⲙⲉ ⲉⲧⲃⲉ ⲧⲕⲁⲧⲁⲃⲁⲥⲓⲥ ⲛ̅ⲧϩⲓⲕⲱⲛ ⲙ̅‐ <text:line-break/><text:span text:style-name="T1"> </text:span><text:span text:style-name="T2">(59/5) </text:span> ⲡⲥⲁϩⲣⲉ ⲉϯⲛⲉ ⲛ̅ⲧⲉⲥⲥⲙⲏ ϩ̅ⲙ̅ ⲡϫⲓⲥⲉ <text:line-break/><text:span text:style-name="T1"> </text:span><text:span text:style-name="T2">(59/6) </text:span> ⲛ̅ⲧϩⲓⲕⲱⲛ ⲛ̅ⲧⲁⲥϭⲱϣⲧ%6 ⲉⲃⲟⲗ ⲉ‐ <text:line-break/><text:span text:style-name="T1"> </text:span><text:span text:style-name="T2">(59/7) </text:span> ⲃⲟⲗ ϩⲓⲧ̅ⲙ̅ ⲡϭⲱϣⲧ%6 ⲛ̅ⲧϩⲓⲕⲱⲛ ⲙ̅‐ <text:line-break/><text:span text:style-name="T1"> </text:span><text:span text:style-name="T2">(59/8) </text:span> ⲡⲥⲁϩⲣⲉ ⲁⲩⲡⲗⲁⲥⲥⲁ ⲙ̅ⲡⲉϩⲟⲩⲉⲓⲧ%6 ⲛ̅‐ <text:line-break/><text:span text:style-name="T1"> </text:span><text:span text:style-name="T2">(59/9) </text:span> ⲡⲗⲁⲥⲙⲁ ⲡⲁⲓ̈ ⲉⲧⲃⲏⲏⲧ̅ϥ̅ ⲁ‐ <text:line-break/><text:span text:style-name="T1"> </text:span><text:span text:style-name="T2">(59/10) </text:span> ⲧⲙⲉⲧⲁⲛⲟⲓⲁ ϣⲱⲡⲉ · ⲁⲥϫⲓ ⲙ̅ⲡⲉⲥ‐ <text:line-break/><text:span text:style-name="T1"> </text:span><text:span text:style-name="T2">(59/11) </text:span> ϫⲱⲕ ⲙ̅ⲛ̅ ⲧⲉⲥϭⲟⲙ ϩ̅ⲙ̅ ⲡⲟⲩⲱϣⲉ <text:line-break/><text:span text:style-name="T1"> </text:span><text:span text:style-name="T2">(59/12) </text:span> ⲙ̅ⲡⲉⲓⲱⲧ%6 ⲙ̅ⲛ̅ ⲧⲉϥⲉⲩⲇⲟⲕⲓⲁ ⲉⲧⲁϥ <text:line-break/><text:soft-page-break/><text:span text:style-name="T1"> </text:span><text:span text:style-name="T2">(59/13) </text:span> ⲉⲩⲇⲟⲕⲓ ⲉϫ̅ⲛ̅ ⲧⲛⲟϭ ⲛ̅ⲅⲉⲛⲉⲁ ⲛ̅ⲁ‐ <text:line-break/><text:span text:style-name="T1"> </text:span><text:span text:style-name="T2">(59/14) </text:span> ⲫⲑⲁⲣⲧⲟⲛ ⲉⲧⲉ ⲙⲉⲥⲕⲓⲙ ⲛ̅ⲛⲓⲛⲟϭ <text:line-break/><text:span text:style-name="T1"> </text:span><text:span text:style-name="T2">(59/15) </text:span> ⲛ̅ⲣⲱⲙⲉ ⲛ̅ϫⲱⲱⲣⲉ ⲙ̅ⲡⲛⲟϭ ⲛ̅ⲥⲏⲑ· <text:line-break/><text:span text:style-name="T1"> </text:span><text:span text:style-name="T2">(59/16) </text:span> ⲉⲧⲣⲉϥϫⲱ ⲙ̅ⲙⲟⲥ ⲉⲛⲁⲓⲱⲛ ⲛ̅ⲧⲁⲩ <text:line-break/><text:span text:style-name="T1"> </text:span><text:span text:style-name="T2">(59/17) </text:span> ϫ〈ⲡ〉ⲟⲟⲩ ϫⲉⲕⲁⲁⲥ ⲉⲃⲟⲗ ϩⲓⲧⲟⲟⲧ̅ⲥ̅ ⲉⲩⲉ‐ <text:line-break/><text:span text:style-name="T1"> </text:span><text:span text:style-name="T2">(59/18) </text:span> ϫⲱⲕ ⲉⲃⲟⲗ ⲙ̅ⲡⲓϩⲩⲥⲧⲉⲣⲏⲙⲁ ⲛⲉ <text:line-break/><text:span text:style-name="T1"> </text:span><text:span text:style-name="T2">(59/19) </text:span> ⲁⲥⲉⲓ ⲅⲁⲣ ⲉⲃⲟⲗ ϩⲓ ⲡⲥⲁϩⲣⲉ ⲉⲡⲉⲥⲏⲧ%6 <text:line-break/><text:span text:style-name="T1"> </text:span><text:span text:style-name="T2">(59/20) </text:span> ⲉⲡⲕⲟⲥⲙⲟⲥ ⲉⲧⲟ ⲙ̅ⲡⲓⲛⲉ ⲛ̅ⲧⲉⲩϣⲏ <text:line-break/><text:span text:style-name="T1"> </text:span><text:span text:style-name="T2">(59/21) </text:span> ⲛ̅ⲧⲉⲣⲉⲥⲉⲓ ⲁⲥⲧⲱⲃϩ ⲙ̅ⲛ̅ ⲛ̅ⲥⲁ ⲧⲉⲥⲡⲟⲣⲁ <text:line-break/><text:span text:style-name="T1"> </text:span><text:span text:style-name="T2">(59/22) </text:span> ⲙ̅ⲡⲁⲣⲭⲱⲛ ⲙ̅ⲡⲉⲉⲓⲁⲓⲱⲛ ⲙ̅ⲛ̅ 〈ⲛ〉ⲉⲝⲟⲩ‐ <text:line-break/><text:span text:style-name="T1"> </text:span><text:span text:style-name="T2">(59/23) </text:span> ⲥⲓⲁ ⲛ̅ⲧⲁⲩϣⲱⲡⲉ ⲉⲃⲟⲗ ⲛ̅ϩⲏⲧ̅ϥ̅ ⲧⲏ‐ <text:line-break/><text:span text:style-name="T1"> </text:span><text:span text:style-name="T2">(59/24) </text:span> ⲉⲧⲥⲟⲟϥ ⲉⲧⲛⲁⲧⲁⲕⲟ ⲛ̅ⲧⲉ ⲡⲛⲟⲩⲧⲉ <text:line-break/><text:span text:style-name="T1"> </text:span><text:span text:style-name="T2">(59/25) </text:span> ⲛ̅ⲣⲉϥϫⲡⲉ ⲇⲁⲓⲙⲱⲛ ⲙ̅ⲛ̅ ⲛ̅ⲥⲁ ⲧⲉⲥⲡⲟ‐ <text:line-break/><text:span text:style-name="T1"> </text:span><text:span text:style-name="T2">(60/1) </text:span> ⲣⲁ ⲛ̅ⲁⲇⲁⲙ ⲧⲉϯⲛⲉ ⲛ̅ⲡⲣⲏ ⲙ̅ⲛ ⲡ‐ <text:line-break/><text:span text:style-name="T1"> </text:span><text:span text:style-name="T2">(60/2) </text:span> ⲛⲟϭ ⲛ̅ⲥⲏⲑ · ⲧⲟⲧⲉ ⲁϥⲉⲓ ⲛ̅ϭⲓ ⲡⲛⲟϭ <text:line-break/><text:span text:style-name="T1"> </text:span><text:span text:style-name="T2">(60/3) </text:span> ⲛ̅ⲁⲅ%3ⲅⲉⲗⲟⲥ ϩⲟⲣⲙⲟⲥ ⲉⲥⲁⲃⲧⲉ ⲉⲃⲟⲗ <text:line-break/><text:span text:style-name="T1"> </text:span><text:span text:style-name="T2">(60/4) </text:span> ϩⲓⲧⲟⲟⲧⲟⲩ ⲛ̅ⲙ̅ⲡⲁⲣⲑⲉⲛⲟⲥ ⲙ̅ⲡⲉ‐ <text:line-break/><text:span text:style-name="T1"> </text:span><text:span text:style-name="T2">(60/5) </text:span> ⲧϫⲟ ⲉⲧϫⲁϩ̅ⲙ̅ · ⲛ̅ⲧⲉ ⲡⲉⲉⲓⲁⲓⲱⲛ ϩ̅ⲛ̅ <text:line-break/><text:span text:style-name="T1"> </text:span><text:span text:style-name="T2">(60/6) </text:span> ⲟⲩⲥⲕⲉⲩⲟⲥ ⲛ̅ⲗⲟⲅⲟⲅⲉⲛⲏⲥ ⲉ〈ϥ〉ⲟⲩⲁ <text:line-break/><text:span text:style-name="T1"> </text:span><text:span text:style-name="T2">(60/7) </text:span> ⲁⲃ · ⲉⲃⲟⲗ ϩⲓⲧⲟⲟⲧ̅ϥ̅ ⲙ̅ⲡⲉⲡ̅ⲛⲁ̅ ⲛ̅ϩⲁ‐ <text:line-break/><text:span text:style-name="T1"> </text:span><text:span text:style-name="T2">(60/8) </text:span> ⲅⲓⲟⲛ 〈ⲛ̅〉ⲧⲉⲥⲡⲟⲣⲁ ⲙ̅ⲡⲛⲟϭ ⲛ̅ⲥⲏⲑ · <text:line-break/><text:span text:style-name="T1"> </text:span><text:span text:style-name="T2">(60/9) </text:span> ⲧⲟⲧⲉ ⲡⲛⲟϭ ⲥ̅ⲏ̅ⲑ̅ · ⲁϥⲉⲓ ⲁϥⲉⲓⲛⲉ ⲛ̅ⲧⲉϥ‐ <text:line-break/><text:span text:style-name="T1"> </text:span><text:span text:style-name="T2">(60/10) </text:span> ⲥⲡⲟⲣⲁ ⲁⲩⲱ ⲁⲩϫⲟ ⲙ̅ⲙⲟⲥ ⲉⲛⲁⲓⲱⲛ <text:line-break/><text:span text:style-name="T1"> </text:span><text:span text:style-name="T2">(60/11) </text:span> ⲛ̅ⲧⲁⲩϫⲡⲟⲟⲩ ⲉⲧⲉⲩⲏⲡⲉ ⲡⲉ ⲡϣⲓ ⲛ̅‐ <text:line-break/><text:span text:style-name="T1"> </text:span><text:span text:style-name="T2">(60/12) </text:span> ⲥⲟⲇⲟⲙⲏⲛ ϩⲟⲉⲓⲛ ⲉⲩϫⲱ ⲙ̅ⲙⲟⲥ <text:line-break/><text:span text:style-name="T1"> </text:span><text:span text:style-name="T2">(60/13) </text:span> ϫⲉ ⲥⲟⲇⲟⲙⲏⲛ ⲡⲉ ⲡⲙⲁ ⲛ̅ⲙⲟⲛⲉ <text:line-break/><text:span text:style-name="T1"> </text:span><text:span text:style-name="T2">(60/14) </text:span> ⲙ̅ⲡⲛⲟϭ ⲛ̅ⲥⲏⲑ · ⲉⲧⲉ ⲅⲟⲙⲟϩⲣⲁ ⲡⲉ <text:line-break/><text:span text:style-name="T1"> </text:span><text:span text:style-name="T2">(60/15) </text:span> ϩⲟⲉⲓⲛ ⲇⲉ ϫⲉ ⲁⲡⲛⲟϭ ⲛ̅ⲥⲏⲑ ϥⲓ ⲙ̅‐ <text:line-break/><text:span text:style-name="T1"> </text:span><text:span text:style-name="T2">(60/16) </text:span> ⲡⲉϥⲧⲱϭⲉ ⲉⲃⲟⲗ ϩ̅ⲛ̅ ⲅⲟⲙⲟϩⲣⲁ ⲁⲩⲱ <text:line-break/><text:span text:style-name="T1"> </text:span><text:span text:style-name="T2">(60/17) </text:span> ⲁϥⲧⲱϭⲉ ⲙ̅ⲙⲟⲥ ϩ̅ⲙ̅ ⲡⲙⲉϩ ⲧⲟⲡⲟⲥ <text:line-break/><text:span text:style-name="T1"> </text:span><text:span text:style-name="T2">(60/18) </text:span> ⲥⲛⲁⲩ ⲡⲁⲓ̈ ⲛ̅ⲧⲁϥϯ ⲣ̅ⲛ̅ϥ̅ ϫⲉ ⲥⲟⲇⲟⲙⲁ <text:line-break/><text:span text:style-name="T1"> </text:span><text:span text:style-name="T2">(60/19) </text:span> ⲧⲁⲓ̈ ⲧⲉ ⲧⲅⲉⲛⲉⲁ ⲛ̅ⲧⲁⲥⲉⲓ ⲉⲃⲟⲗ ϩⲓⲧⲟ‐ <text:line-break/><text:span text:style-name="T1"> </text:span><text:span text:style-name="T2">(60/20) </text:span> ⲟⲧ̅ⲥ̅ ⲛ̅ⲉⲇⲱⲕⲗⲁ · ⲁⲥϫⲡⲟ ⲅⲁⲣ ϩ̅ⲙ̅ ⲡϣⲁ‐ <text:line-break/><text:span text:style-name="T1"> </text:span><text:span text:style-name="T2">(60/21) </text:span> ϫⲉ ⲛ̅ⲧⲁⲗⲏⲑⲉⲓⲁ 〈ⲙ̅〉ⲛ̅ ⲑⲉ{ⲛ̅}ⲙⲓⲥⲥⲁ ⲧⲁⲣ‐ <text:line-break/><text:span text:style-name="T1"> </text:span><text:span text:style-name="T2">(60/22) </text:span> ⲭⲏ ⲛ̅ⲧⲉⲥⲡⲟⲣⲁ ⲙ̅ⲡⲱⲛϩ· ⲛ̅ϣⲁ ⲁ‐ <text:line-break/><text:span text:style-name="T1"> </text:span><text:span text:style-name="T2">(60/23) </text:span> ⲛⲏϩⲉ ⲉⲧϣⲟⲟⲡ%6 ⲙ̅ⲛ̅ ⲛⲉⲧⲛⲁϩⲩⲡⲟ <text:line-break/><text:span text:style-name="T1"> </text:span><text:span text:style-name="T2">(60/24) </text:span> ⲙⲓⲛⲉ ⲉⲧⲃⲉ ⲡⲥⲟⲟⲩⲛ ⲛ̅ⲧⲉⲩⲁⲡⲟ <text:line-break/><text:span text:style-name="T1"> </text:span><text:span text:style-name="T2">(60/25) </text:span> ϩⲣⲟⲓⲁ ⲧⲁⲓ̈ ⲧⲉ ⲧⲛⲟϭ ⲛ̅ⲅⲉⲛⲉⲁ ⲛ̅ⲁ‐ <text:line-break/><text:span text:style-name="T1"> </text:span><text:span text:style-name="T2">(60/26) </text:span> ⲫⲑⲁⲣⲧⲟⲥ ⲉⲣⲉⲓ ⲉⲃⲟⲗ ϩⲓⲧ̅ⲛ̅ ϣⲟⲙ̅ⲛⲧ̅‐ <text:line-break/><text:span text:style-name="T1"> </text:span><text:span text:style-name="T2">(61/1) </text:span> ⲛ̅ⲕⲟⲥⲙⲟⲥ ⲉⲡⲕⲟⲥⲙⲟⲥ ⲁⲩⲱ ⲁⲡⲕⲁ‐ <text:line-break/><text:span text:style-name="T1"> </text:span><text:span text:style-name="T2">(61/2) </text:span> ⲧⲁⲕⲗⲩⲥⲙⲟⲥ ϣⲱⲡⲉ ⲛ̅ⲟⲩⲧⲩⲡⲟⲥ <text:line-break/><text:span text:style-name="T1"> </text:span><text:span text:style-name="T2">(61/3) </text:span> ϣⲁ ⲧⲥⲩⲛⲧⲉⲗⲓⲁ ⲙ̅ⲡⲁⲓⲱⲛ ⲡⲁⲓ̈ ⲇⲉ <text:line-break/><text:span text:style-name="T1"> </text:span><text:span text:style-name="T2">(61/4) </text:span> ⲥⲉⲛⲁϫⲟⲟⲩϥ ⲉϩⲣⲁⲓ̈ ⲉⲡⲕⲟⲥⲙⲟⲥ ⲉ‐ <text:line-break/><text:span text:style-name="T1"> </text:span><text:span text:style-name="T2">(61/5) </text:span> ⲧⲃⲉ ⲧⲉⲉⲓⲅⲉⲛⲉⲁ ⲟⲩⲛ̅ ⲟⲩⲣⲱⲭϩ ⲛⲁ‐ <text:line-break/><text:span text:style-name="T1"> </text:span><text:span text:style-name="T2">(61/6) </text:span> ϣⲱⲡⲉ ϩⲓϫ̅ⲙ̅ ⲡⲕⲁϩ· ⲁⲩⲱ ⲉⲣⲉⲡⲉϩ <text:line-break/><text:span text:style-name="T1"> </text:span><text:span text:style-name="T2">(61/7) </text:span> ⲙⲟⲧ%6 ϣⲱⲡⲉ ⲙ̅ⲛ̅ ⲛⲉⲧⲏⲡ%6 ⲉⲧⲅⲉ‐ <text:line-break/><text:span text:style-name="T1"> </text:span><text:span text:style-name="T2">(61/8) </text:span> ⲛⲉⲁ ⲉⲃⲟⲗ ϩⲓⲧⲟⲟⲧⲟⲩ ⲛ̅ⲛⲉⲡⲣⲟⲫⲏ‐ <text:line-break/><text:soft-page-break/><text:span text:style-name="T1"> </text:span><text:span text:style-name="T2">(61/9) </text:span> ⲧⲏⲥ ⲙ̅ⲛ̅ ⲛ̅ϩⲟⲩⲣⲓⲧ%6 ⲉⲧϩⲁⲣⲏϩ ⲉⲡⲱⲛϩ <text:line-break/><text:span text:style-name="T1"> </text:span><text:span text:style-name="T2">(61/10) </text:span> ⲛ̅ⲧⲅⲉⲛⲉⲁ · ⲉⲧⲃⲉ ⲧⲉⲉⲓⲅⲉⲛⲉⲁ ⲉⲣⲉ <text:line-break/><text:span text:style-name="T1"> </text:span><text:span text:style-name="T2">(61/11) </text:span> ϩⲉⲛϩⲉⲃⲱⲱⲛ ϣⲱⲡⲉ ⲙ̅ⲛ̅ ϩⲉⲛⲗⲟⲓ <text:line-break/><text:span text:style-name="T1"> </text:span><text:span text:style-name="T2">(61/12) </text:span> ⲙⲟⲥ ⲛⲁⲓ̈ ⲇⲉ ⲉⲩⲛⲁϣⲱⲡⲉ ⲉⲧⲃⲉ ϯ <text:line-break/><text:span text:style-name="T1"> </text:span><text:span text:style-name="T2">(61/13) </text:span> ⲛⲟϭ ⲛ̅ⲅⲉⲛⲉⲁ ⲛ̅ⲁⲫⲑⲁⲣⲧⲟⲥ · ⲉⲧⲃⲉ <text:line-break/><text:span text:style-name="T1"> </text:span><text:span text:style-name="T2">(61/14) </text:span> ⲧⲉⲉⲓⲅⲉⲛⲉⲁ ⲉⲣⲉϩ̅ⲛ̅ⲡⲓⲣⲁⲥⲙⲟⲥ ϣⲱ‐ <text:line-break/><text:span text:style-name="T1"> </text:span><text:span text:style-name="T2">(61/15) </text:span> ⲡⲉ ⲟⲩⲡⲗⲁⲛⲏ ⲛ̅ⲡⲣⲟⲫⲏⲧⲏⲥ ⲛ̅ⲛⲟⲩϫ <text:line-break/><text:span text:style-name="T1"> </text:span><text:span text:style-name="T2">(61/16) </text:span> ⲧⲟⲧⲉ ⲡⲛⲟϭ ⲛ̅ⲥⲏⲑ · ⲁϥⲛⲁⲩ ⲉⲧⲉⲛⲉⲣ‐ <text:line-break/><text:span text:style-name="T1"> </text:span><text:span text:style-name="T2">(61/17) </text:span> ⲅⲓⲁ ⲙ̅ⲡⲇⲓⲁⲃⲟⲗⲟⲥ ⲙ̅ⲛ ⲡⲉϥⲁⲧⲟ ⲛ̅‐ <text:line-break/><text:span text:style-name="T1"> </text:span><text:span text:style-name="T2">(61/18) </text:span> ⲥⲙⲟⲧ%6 ⲙ̅ⲛ̅ ⲛⲉϥⲙⲉⲉⲩⲉ ⲉⲧⲛⲁϣⲱⲡⲉ <text:line-break/><text:span text:style-name="T1"> </text:span><text:span text:style-name="T2">(61/19) </text:span> ⲉϫ̅ⲛ̅ ⲧⲉϥⲅⲉⲛⲉⲁ ⲛ̅ⲁⲫⲑⲁⲣⲧⲟⲛ ⲉⲧⲉ <text:line-break/><text:span text:style-name="T1"> </text:span><text:span text:style-name="T2">(61/20) </text:span> ⲙⲉⲥⲕⲓⲙ ⲙ̅ⲛ̅ ⲛ̅ⲇⲓⲱⲅⲙⲟⲥ ⲛ̅ⲛⲉϥ‐ <text:line-break/><text:span text:style-name="T1"> </text:span><text:span text:style-name="T2">(61/21) </text:span> ϭⲟⲙ ⲙ̅ⲛ̅ ⲛⲉϥⲁⲅ%3ⲅⲉⲗⲟⲥ ⲙ̅ⲛ̅ ⲧⲉⲩ‐ <text:line-break/><text:span text:style-name="T1"> </text:span><text:span text:style-name="T2">(61/22) </text:span> ⲡⲗⲁⲛⲏ ϫⲉ ⲁⲩⲧⲟⲗⲙⲁ ⲉⲣⲟⲟⲩ ⲙ̅ⲙⲓⲛ <text:line-break/><text:span text:style-name="T1"> </text:span><text:span text:style-name="T2">(61/23) </text:span> ⲙ̅ⲙⲟⲟⲩ · ⲧⲟⲧⲉ ⲡⲛⲟϭ ⲛ̅ⲥⲏⲑ · ⲁϥϯ‐ <text:line-break/><text:span text:style-name="T1"> </text:span><text:span text:style-name="T2">(61/24) </text:span> ⲛ̅ⲟⲩⲥⲙⲟⲩ ⲙ̅ⲡⲛⲟϭ ⲛ̅ⲁⲕⲗⲏⲧⲟⲛ <text:line-break/><text:span text:style-name="T1"> </text:span><text:span text:style-name="T2">(61/25) </text:span> ⲙ̅ⲡⲁⲣⲑⲉⲛⲓⲕⲟⲛ ⲙ̅ⲡ̅ⲛ̅ⲁ̅ ⲙ̅ⲛ̅ ⲧⲁⲣ‐ <text:line-break/><text:span text:style-name="T1"> </text:span><text:span text:style-name="T2">(62/1) </text:span> ⲥⲉⲛⲓⲕⲏ ⲙ̅ⲡⲁⲣⲑⲉⲛⲟⲥ ⲧⲃⲁⲣⲃⲏⲗⲟⲛ <text:line-break/><text:span text:style-name="T1"> </text:span><text:span text:style-name="T2">(62/2) </text:span> ⲙ̅ⲛ̅ ⲡϣⲟⲙⲛⲧ̅%6̅ ⲛ̅ϩⲟⲟⲩⲧ%6 ⲛ̅ⲁⲗⲟⲩ ⲧ̅ⲉⲗ̅‐ <text:line-break/><text:span text:style-name="T1"> </text:span><text:span text:style-name="T2">(62/3) </text:span> ⲙ̅ⲁ̅ⲏ̅ⲗ̅· ⲧ̅ⲉⲗⲙⲁⲏⲗ̅· ϩ̅ⲏⲗⲓ̅ ϩ̅ⲏⲗⲓ̅· ⲙ̅ⲁⲭⲁⲣ̅ <text:line-break/><text:span text:style-name="T1"> </text:span><text:span text:style-name="T2">(62/4) </text:span> ⲙ̅ⲁ̅ⲭ̅ⲁ̅ⲣ̅ · ⲥ̅ⲏⲑ̅ ⲧϭⲟⲙ ⲉⲧⲟⲛϩ ⲁⲗⲏⲑⲉⲥ <text:line-break/><text:span text:style-name="T1"> </text:span><text:span text:style-name="T2">(62/5) </text:span> ⲁⲗⲏⲑⲱⲥ ⲙ̅ⲛ̅ ⲧⲁⲣⲥⲉⲛⲓⲕⲏ ⲛ̅ⲡⲁⲣⲑⲉ‐ <text:line-break/><text:span text:style-name="T1"> </text:span><text:span text:style-name="T2">(62/6) </text:span> ⲛⲟⲥ ⲓ̈ⲟⲩⲏⲗ · ⲙ̅ⲛ̅ ⲏⲥⲏⲫⲏⲭ ⲡⲉⲧⲙⲁϩ‐ <text:line-break/><text:span text:style-name="T1"> </text:span><text:span text:style-name="T2">(62/7) </text:span> ⲧⲉ ⲙ̅ⲡⲉⲟⲟⲩ ⲙ̅ⲛ̅ ⲡⲉⲕⲗⲟⲙ ⲙ̅ⲡⲉϥⲉⲟ‐ <text:line-break/><text:span text:style-name="T1"> </text:span><text:span text:style-name="T2">(62/8) </text:span> ⲟⲩ ⲙ̅ⲛ̅ ⲡⲛⲟϭ ⲛ̅ⲇⲟⲝⲟⲙⲉⲇⲱⲛ ⲛ̅ⲁⲓ <text:line-break/><text:span text:style-name="T1"> </text:span><text:span text:style-name="T2">(62/9) </text:span> ⲱⲛ ⲙ̅ⲛ̅ ⲛⲉⲑⲣⲟⲛⲟⲥ ⲉⲧ̅ⲛ̅ϩⲏⲧ̅ϥ̅ · ⲙ̅ⲛ̅ <text:line-break/><text:span text:style-name="T1"> </text:span><text:span text:style-name="T2">(62/10) </text:span> ⲛ̅ϭⲟⲙ ⲉⲧⲕⲱⲧⲉ ⲉⲣⲟⲟⲩ ⲙ̅ⲛ̅ ⲡⲉⲡⲗⲏ‐ <text:line-break/><text:span text:style-name="T1"> </text:span><text:span text:style-name="T2">(62/11) </text:span> ⲣⲱⲙⲁ ⲧⲏⲣ̅ϥ̅ ⲛ̅ⲑⲉ ⲛ̅ⲧⲁⲉⲓϣ̅ⲣ〈ⲡ̅〉 ⲛ̅ϫⲟ‐ <text:line-break/><text:span text:style-name="T1"> </text:span><text:span text:style-name="T2">(62/12) </text:span> ⲟⲥ ⲁⲩⲱ ⲁϥⲁⲓⲧⲓ ⲛ̅ϩⲉⲛⲣⲉϥⲁⲣⲉϩ ⲉⲧⲉϥ‐ <text:line-break/><text:span text:style-name="T1"> </text:span><text:span text:style-name="T2">(62/13) </text:span> ⲥⲡⲟⲣⲁ ⲧⲟⲧⲉ ⲁⲩⲉⲓ ⲉⲃⲟⲗ ϩ̅ⲛ̅ ⲛ̅ⲛⲟϭ ⲛ̅‐ <text:line-break/><text:span text:style-name="T1"> </text:span><text:span text:style-name="T2">(62/14) </text:span> ⲁⲓⲱⲛ ⲛ̅ϭⲓ ϥⲧⲟⲩϣⲉ ⲛ̅ⲛⲁⲉⲣⲟⲥⲓⲟⲥ ⲛ̅‐ <text:line-break/><text:span text:style-name="T1"> </text:span><text:span text:style-name="T2">(62/15) </text:span> ⲁⲅ%3ⲅⲉⲗⲟⲥ ⲉϥⲛ̅ⲙ̅ⲙⲁⲩ ⲛ̅ϭⲓ ⲡⲛⲟϭ ⲛ̅‐ <text:line-break/><text:span text:style-name="T1"> </text:span><text:span text:style-name="T2">(62/16) </text:span> ⲁⲉⲣ̅ⲟ̅ⲥ̅ⲓ̅ⲏ̅ⲗ̅ ⲙ̅ⲛ̅ ⲡⲛⲟϭ ⲥⲉⲗⲙⲉⲭⲉⲗ ⲉ‐ <text:line-break/><text:span text:style-name="T1"> </text:span><text:span text:style-name="T2">(62/17) </text:span> ϩⲁⲣⲉϩ ⲉⲧⲛⲟϭ ⲛ̅ⲅⲉⲛⲉⲁ ⲛ̅ⲁⲫⲑⲁⲣⲧⲟⲥ <text:line-break/><text:span text:style-name="T1"> </text:span><text:span text:style-name="T2">(62/18) </text:span> ⲡⲉⲥⲕⲁⲣⲡⲟⲥ ⲙ̅ⲛ̅ ⲛ̅ⲛⲟϭ ⲛ̅ⲣⲱⲙⲉ <text:line-break/><text:span text:style-name="T1"> </text:span><text:span text:style-name="T2">(62/19) </text:span> ⲙ̅ⲡⲛⲟϭ ⲥⲏⲑ ϫⲓⲛ ⲙ̅ⲡⲉⲟⲩⲟⲉⲓϣ ⲙ̅ⲛ̅ <text:line-break/><text:span text:style-name="T1"> </text:span><text:span text:style-name="T2">(62/20) </text:span> ⲡⲕⲉⲣⲟⲥ ⲛ̅ⲧⲁⲗⲏⲑⲉⲓⲁ ⲙ̅ⲛ̅ ⲑⲉⲙⲓⲥⲥⲁ <text:line-break/><text:span text:style-name="T1"> </text:span><text:span text:style-name="T2">(62/21) </text:span> ϣⲁ ⲧⲥⲩⲛⲧⲉⲗⲓ̈ⲁ ⲙ̅ⲡⲁⲓⲱⲛ ⲙ̅ⲛ̅ ⲛⲉϥ‐ <text:line-break/><text:span text:style-name="T1"> </text:span><text:span text:style-name="T2">(62/22) </text:span> ⲁⲣⲭⲱⲛ · ⲛⲁⲓ̈ ⲛ̅ⲧⲁⲩⲕⲣⲓⲛⲉ ⲙ̅ⲙⲟⲟⲩ <text:line-break/><text:span text:style-name="T1"> </text:span><text:span text:style-name="T2">(62/23) </text:span> ⲛ̅ϭⲓ ⲛ̅ⲛⲟϭ ⲛ̅ⲕⲣⲓⲧⲏⲥ ϣⲁϩⲣⲁⲓ̈ ⲉ‐ <text:line-break/><text:span text:style-name="T1"> </text:span><text:span text:style-name="T2">(62/24) </text:span> ⲡⲙⲟⲩ · ⲧⲟⲧⲉ ⲡⲛⲟϭ ⲛ̅ⲥⲏⲑ · ⲁϥⲧ̅ⲛ̅ <text:line-break/><text:span text:style-name="T1"> </text:span><text:span text:style-name="T2">(62/25) </text:span> ⲛⲟⲟⲩ ⲉⲃⲟⲗ ϩⲓⲧⲟⲟⲧⲟⲩ ⲙ̅ⲡⲉϥⲧⲟⲟⲩ <text:line-break/><text:span text:style-name="T1"> </text:span><text:span text:style-name="T2">(62/26) </text:span> ⲛ̅ⲟⲩⲟⲉⲓⲛ ϩ̅ⲙ̅ ⲡⲉⲑⲉⲗⲏⲙⲁ ⲙ̅ⲡⲁⲩⲧⲟ <text:line-break/><text:span text:style-name="T1"> </text:span><text:span text:style-name="T2">(63/1) </text:span> ⲅⲉⲛⲏⲥ ⲙ̅ⲛ̅ ⲡⲉⲡⲗⲏⲣⲱⲙⲁ ⲧⲏⲣϥ ϩⲓⲧ̅ⲙ̅ <text:line-break/><text:span text:style-name="T1"> </text:span><text:span text:style-name="T2">(63/2) </text:span> 〈ⲡϯ〉 ⲙ̅ⲛ̅ ⲧⲉⲩⲇⲟⲕⲓⲁ ⲙ̅ⲡⲛⲟϭ ⲛ̅ⲁ‐ <text:line-break/><text:span text:style-name="T1"> </text:span><text:span text:style-name="T2">(63/3) </text:span> ϩⲟⲣⲁⲧⲟⲛ ⲙ̅ⲡ̅ⲛ̅ⲁ̅ ⲙ̅ⲛ̅ ⲧϯⲉ ⲛ̅ⲥⲫⲣⲁⲅⲓⲥ <text:line-break/><text:span text:style-name="T1"> </text:span><text:span text:style-name="T2">(63/4) </text:span> ⲙ̅ⲛ̅ ⲡⲉⲡⲗⲏⲣⲱⲙⲁ ⲧⲏⲣ̅ϥ̅ · ⲁϥⲟⲩⲱⲧ̅ⲃ̅ <text:line-break/><text:soft-page-break/><text:span text:style-name="T1"> </text:span><text:span text:style-name="T2">(63/5) </text:span> ⲛ̅ⲧϣⲟⲙⲧⲉ ⲛ̅ⲡⲁⲣⲟⲩⲥⲓⲁ ⲛ̅ⲧⲁⲉⲓϫⲟⲟⲩ <text:line-break/><text:span text:style-name="T1"> </text:span><text:span text:style-name="T2">(63/6) </text:span> ⲛ̅ϣⲟⲣⲡ%6 ⲙ̅ⲛ̅ ⲡⲕⲁⲧⲁⲕⲗⲩⲥⲙⲟⲥ ⲙ̅ⲛ̅ ⲡⲣⲱ‐ <text:line-break/><text:span text:style-name="T1"> </text:span><text:span text:style-name="T2">(63/7) </text:span> ⲕ̅ϩ̅ ⲙ̅ⲛ ⲡϩⲉⲡ%6 ⲛ̅ⲛ̅ⲁⲣⲭⲱⲛ ⲙ̅ⲛ̅ ⲛ̅ⲇⲩⲛⲁ‐ <text:line-break/><text:span text:style-name="T1"> </text:span><text:span text:style-name="T2">(63/8) </text:span> ⲙⲓⲥ ⲙ̅ⲛ̅ ⲛ̅ⲉⲝⲟⲩⲥⲓⲁ ⲉⲛⲟⲩϩ̅ⲙ̅ ⲧⲏ ⲉⲧⲡⲗⲁ‐ <text:line-break/><text:span text:style-name="T1"> </text:span><text:span text:style-name="T2">(63/9) </text:span> ⲛⲁ ϩⲓⲧ̅ⲙ̅ ⲡϩⲱⲧⲡ%6 ⲙ̅ⲡⲕⲟⲥⲙⲟⲥ ⲙ̅ⲛ̅ <text:line-break/><text:span text:style-name="T1"> </text:span><text:span text:style-name="T2">(63/10) </text:span> ⲡⲃⲁⲡⲧⲓⲥⲙⲁ ϩⲓⲧ̅ⲛ̅ ⲟⲩⲗⲟⲅⲟⲅⲉⲛⲏⲥ ⲛ̅‐ <text:line-break/><text:span text:style-name="T1"> </text:span><text:span text:style-name="T2">(63/11) </text:span> ⲥⲱⲙⲁ ⲛ̅ⲧⲁϥⲥ̅ⲃ̅ⲧⲱⲧ̅ϥ̅ ⲛⲁϥ ⲛ̅ϭⲓ ⲡⲛⲟϭ <text:line-break/><text:span text:style-name="T1"> </text:span><text:span text:style-name="T2">(63/12) </text:span> ⲛ̅ⲥⲏⲑ · ϩ̅ⲛ̅ ⲟⲩⲙⲩⲥⲧⲏⲣⲓⲟⲛ ⲉⲃⲟⲗ ϩⲓⲧⲟ <text:line-break/><text:span text:style-name="T1"> </text:span><text:span text:style-name="T2">(63/13) </text:span> ⲟⲧ̅ⲥ̅ ⲛ̅ⲧⲡⲁⲣⲑⲉⲛⲟⲥ ⲉⲧⲣⲟⲩϫⲡⲟ ⲛ̅ⲛⲉ‐ <text:line-break/><text:span text:style-name="T1"> </text:span><text:span text:style-name="T2">(63/14) </text:span> ⲧⲟⲩⲁⲁⲃ ϩⲓⲧ̅ⲛ̅ ⲡⲉⲡ̅ⲛⲁ̅ ⲉⲧⲟⲩⲁⲁⲃ · ϩⲓⲧ̅ⲛ̅ <text:line-break/><text:span text:style-name="T1"> </text:span><text:span text:style-name="T2">(63/15) </text:span> ϩⲉⲛⲥⲩⲙⲃⲟⲗⲟⲛ ⲛ̅ⲁϩⲟⲣⲁⲧⲟⲛ ⲉⲩϩⲏⲡ <text:line-break/><text:span text:style-name="T1"> </text:span><text:span text:style-name="T2">(63/16) </text:span> ϩ̅ⲛ̅ ⲟⲩϩⲱⲧⲡ ⲙ̅ⲡⲕⲟⲥⲙⲟⲥ ⲉⲡⲕⲟⲥ <text:line-break/><text:span text:style-name="T1"> </text:span><text:span text:style-name="T2">(63/17) </text:span> ⲙⲟⲥ ϩⲓⲧ̅ⲛ̅ ⲡⲁⲡⲟⲧⲁⲥⲥⲉ ⲙ̅ⲡⲕⲟⲥⲙⲟⲥ <text:line-break/><text:span text:style-name="T1"> </text:span><text:span text:style-name="T2">(63/18) </text:span> ⲙ̅ⲛ̅ ⲡⲛⲟⲩⲧⲉ ⲙ̅ⲡⲙ̅ⲛⲧ̅ϣⲟⲙⲧⲉ ⲛ̅ⲁⲓⲱⲛ <text:line-break/><text:span text:style-name="T1"> </text:span><text:span text:style-name="T2">(63/19) </text:span> ⲙ̅ⲛ̅ ⲛⲉⲡⲓⲕⲗⲏⲧⲟⲥ ⲛ̅ⲛⲉⲧⲟⲩⲁⲁⲃ ⲙ̅ⲛ̅ <text:line-break/><text:span text:style-name="T1"> </text:span><text:span text:style-name="T2">(63/20) </text:span> ⲛⲓⲁϩⲣⲏⲧⲟⲥ ⲙ̅ⲛ̅ ⲛⲓⲁⲫⲑⲁⲣⲧⲟⲥ ⲛ̅ⲕⲟⲗ <text:line-break/><text:span text:style-name="T1"> </text:span><text:span text:style-name="T2">(63/21) </text:span> ⲡⲟⲥ ⲙ̅ⲛ̅ ⲡⲛⲟϭ ⲛⲟⲩⲟⲉⲓⲛ ⲙ̅ⲡⲉⲓⲱⲧ%6 <text:line-break/><text:span text:style-name="T1"> </text:span><text:span text:style-name="T2">(63/22) </text:span> ⲉⲧⲁϥⲣ̅ϣ̅ⲣ̅ⲡ̅ ⲛ̅ϣⲱⲡⲉ ⲙ̅ⲛ̅ ⲧⲉϥⲡⲣⲟ‐ <text:line-break/><text:span text:style-name="T1"> </text:span><text:span text:style-name="T2">(63/23) </text:span> ⲛⲟⲓ̈ⲁ ⲁⲩⲱ ⲁϥⲕⲩⲣⲟⲩ ⲉⲃⲟⲗ ϩⲓⲧⲟⲟⲧ̅ⲥ̅ <text:line-break/><text:span text:style-name="T1"> </text:span><text:span text:style-name="T2">(63/24) </text:span> ⲛ̅ⲡⲃⲁⲡⲧⲓⲥⲙⲁ ⲉⲧⲟⲩⲁⲁⲃ · ⲉⲧⲟⲩⲁⲧⲃ· <text:line-break/><text:span text:style-name="T1"> </text:span><text:span text:style-name="T2">(63/25) </text:span> ⲉⲧⲡⲉ ⲉⲃⲟⲗ ϩⲓⲧⲟⲟⲧ̅ϥ̅ ⲙ̅ⲡⲓⲁⲫⲑⲁⲣⲧⲟⲥ <text:line-break/><text:span text:style-name="T1"> </text:span><text:span text:style-name="T2">(64/1) </text:span> ⲛ̅ⲗⲟⲅⲟⲅⲉⲛⲏⲥ ⲙ̅ⲛ̅ ⲓ̅ⲏⲥ̅ ⲡⲉⲧⲟⲛϩ ⲙ̅ⲛ̅ <text:line-break/><text:span text:style-name="T1"> </text:span><text:span text:style-name="T2">(64/2) </text:span> ⲡⲉⲛⲧⲁϥϯ ⲙ̅ⲙⲟϥ ϩⲓⲱⲱϥ ⲛ̅ϭⲓ ⲡⲛⲟϭ <text:line-break/><text:span text:style-name="T1"> </text:span><text:span text:style-name="T2">(64/3) </text:span> ⲛ̅ⲥⲏⲑ · ⲁⲩⲱ ⲁϥⲱϥⲧ%6 ⲛ̅ⲛ̅ⲇⲩⲛⲁⲙⲓⲥ <text:line-break/><text:span text:style-name="T1"> </text:span><text:span text:style-name="T2">(64/4) </text:span> ⲙ̅ⲡⲙⲛⲧ̅†̅8̅6̅ϣⲟⲙⲧⲉ ⲛ̅ⲁⲓⲱⲛ ⲁⲩⲱ ⲁϥ‐ <text:line-break/><text:span text:style-name="T1"> </text:span><text:span text:style-name="T2">(64/5) </text:span> ⲕⲩⲣⲟⲩ ⲉⲃⲟⲗ ϩⲓⲧⲟⲟⲧ̅ϥ̅ · ⲛ̅ⲛⲉⲧⲁⲅⲉ ⲙ̅ⲛ̅ <text:line-break/><text:span text:style-name="T1"> </text:span><text:span text:style-name="T2">(64/6) </text:span> ⲛⲉⲧⲁⲡⲁⲅⲉ ⲁϥϩⲟⲡⲗⲓⲍⲉ ⲙ̅ⲙⲟⲟⲩ <text:line-break/><text:span text:style-name="T1"> </text:span><text:span text:style-name="T2">(64/7) </text:span> ϩ̅ⲛ̅ ⲟⲩϩⲟⲡⲗⲟⲛ ⲛ̅ⲥⲟⲟⲩⲛ ⲛ̅ⲧⲉⲓ̈ⲁⲗⲏ <text:line-break/><text:span text:style-name="T1"> </text:span><text:span text:style-name="T2">(64/8) </text:span> ⲑⲉⲓⲁ ϩ̅ⲛ̅ ⲟⲩⲇⲩⲛⲁⲙⲓⲥ ⲛ̅ⲁⲧ%6ϫⲣⲟ ⲉⲣⲟⲥ <text:line-break/><text:span text:style-name="T1"> </text:span><text:span text:style-name="T2">(64/9) </text:span> ⲛ̅ⲧⲉ ⲧⲁⲫⲑⲁⲣⲥⲓⲁ ⲁϥⲟⲩⲱⲛϩ ⲛⲁⲩ ⲉ‐ <text:line-break/><text:span text:style-name="T1"> </text:span><text:span text:style-name="T2">(64/10) </text:span> ⲃⲟⲗ ⲛ̅ϭⲓ ⲡⲛⲟϭ ⲛ̅ⲡⲁⲣⲉⲥⲧⲁⲧⲏⲥ ⲓ̅̈̅ⲉ̅ⲥ̅ⲥ̅ⲉ̅ⲁ̅ <text:line-break/><text:span text:style-name="T1"> </text:span><text:span text:style-name="T2">(64/11) </text:span> ⲙ̅ⲁ̅ⲍ̅ⲁ̅ⲣ̅ⲉ̅ⲁ̅ ⲓ̅̈ⲉⲥⲥⲉⲇⲉⲕⲉⲁ̅ · ⲡⲙⲟⲟⲩ <text:line-break/><text:span text:style-name="T1"> </text:span><text:span text:style-name="T2">(64/12) </text:span> ⲉⲧⲟⲛϩ · ⲙ̅ⲛ̅ ⲛⲓⲛⲟϭ ⲛ̅ⲥⲧⲣⲁⲧⲏⲅⲟⲥ <text:line-break/><text:span text:style-name="T1"> </text:span><text:span text:style-name="T2">(64/13) </text:span> ⲓ̈ⲁⲕⲱⲃⲟⲥ ⲡⲛⲟϭ ⲙ̅ⲛ̅ ⲑⲉⲟⲡⲉⲙ <text:line-break/><text:span text:style-name="T1"> </text:span><text:span text:style-name="T2">(64/14) </text:span> ⲡⲧⲟⲥ ⲙ̅ⲛ̅ ⲓ̅̈ⲥⲁⲟⲩⲏⲗ̅ ⲙ̅ⲛ̅ ⲛⲉⲧϩⲓϫⲛ <text:line-break/><text:span text:style-name="T1"> </text:span><text:span text:style-name="T2">(64/15) </text:span> ⲧⲡⲏⲅⲏ ⲙ̅ⲙⲏⲉ ⲙⲓⲭⲉⲁ ⲙ̅ⲛ̅ ⲙⲓⲭⲁⲣ <text:line-break/><text:span text:style-name="T1"> </text:span><text:span text:style-name="T2">(64/16) </text:span> ⲙ̅ⲛ̅ ⲙⲛⲏⲥⲓⲛⲟⲩⲥ ⲙ̅ⲛ ⲡⲉⲧϩⲓϫ̅ⲙ̅ <text:line-break/><text:span text:style-name="T1"> </text:span><text:span text:style-name="T2">(64/17) </text:span> ⲡϫⲱⲕ̅ⲙ̅ ⲛ̅ⲛⲉⲧⲟⲛϩ · ⲙ̅ⲛ̅ ⲛⲓⲣⲉϥ <text:line-break/><text:span text:style-name="T1"> </text:span><text:span text:style-name="T2">(64/18) </text:span> ⲧⲟⲩⲃⲟ ⲙ̅ⲛ̅ ⲥⲉⲥⲉⲅ%6ⲅⲉⲛⲫⲁⲣⲁⲅ%6ⲅⲏⲛ <text:line-break/><text:span text:style-name="T1"> </text:span><text:span text:style-name="T2">(64/19) </text:span> ⲙ̅ⲛ̅ ⲛⲉⲧϩⲓϫ̅ⲛ̅ ⲙ̅ⲡⲩⲗⲏ ⲛ̅ⲙ̅ⲙⲟⲩⲉⲓⲟ <text:line-break/><text:span text:style-name="T1"> </text:span><text:span text:style-name="T2">(64/20) </text:span> ⲟⲩⲉ ⲙⲓⲭⲉⲩⲥ ⲙ̅ⲛ̅ ⲛⲓⲭⲁⲣ ⲙ̅ⲛ̅ ⲛⲉⲧ‐ <text:line-break/><text:span text:style-name="T1"> </text:span><text:span text:style-name="T2">(64/21) </text:span> ϩⲓϫ̅ⲙ̅ ⲡⲧⲟⲟⲩ ⲛ̅ⲥⲉⲗⲇⲁⲱ ⲙ̅ⲛ̅ ⲛⲉⲗⲁⲓ̈ <text:line-break/><text:span text:style-name="T1"> </text:span><text:span text:style-name="T2">(64/22) </text:span> ⲛⲟⲥ ⲙ̅ⲛ̅ ⲛⲉⲛⲡⲁⲣⲁⲗⲏⲙⲡⲧⲱⲣ ⲛ̅‐ <text:line-break/><text:span text:style-name="T1"> </text:span><text:span text:style-name="T2">(64/23) </text:span> ⲧⲛⲟϭ ⲛ̅ⲅⲉⲛⲉⲁ ⲛⲁⲫⲑⲁⲣⲧⲟⲛ ⲛ̅{ⲓ}ⲣⲱ‐ <text:line-break/><text:span text:style-name="T1"> </text:span><text:span text:style-name="T2">(64/24) </text:span> ⲙⲉ ⲛ̅ϫⲱⲱⲣⲉ 〈ⲙ̅〉ⲡⲛⲟϭ ⲛ̅ⲥⲏⲑ · ⲛ̅ⲇⲓⲁ‐ <text:line-break/><text:span text:style-name="T1"> </text:span><text:span text:style-name="T2">(64/25) </text:span> ⲕⲟⲛⲟⲥ ⲙ̅ⲡⲉϥⲧⲟⲟⲩ ⲛ̅ⲟⲩⲟⲉⲓⲛ <text:line-break/><text:span text:style-name="T1"> </text:span><text:span text:style-name="T2">(64/26) </text:span> ⲡⲛⲟϭ ⲛ̅ⲅⲁⲙⲁⲗⲓⲏⲗ · ⲡⲛⲟϭ ⲛ̅ⲅⲁⲃⲣⲓ‐ <text:line-break/><text:soft-page-break/><text:span text:style-name="T1"> </text:span><text:span text:style-name="T2">(64/27) </text:span> ⲏⲗ· ⲡⲛⲟϭ ⲥⲁⲙⲃⲗⲱ ⲙ̅ⲛ̅ ⲡⲛⲟϭ <text:line-break/><text:span text:style-name="T1"> </text:span><text:span text:style-name="T2">(65/1) </text:span> ⲛⲁⲃⲣⲁⲥⲁⲝ · ⲙ̅ⲛ̅ ⲛⲉⲧϩⲓϫ̅ⲙ̅ ⲡⲣⲏ ⲧⲉϥϩⲓ‐ <text:line-break/><text:span text:style-name="T1"> </text:span><text:span text:style-name="T2">(65/2) </text:span> ⲏ ⲛ̅ⲉⲓ ⲉⲃⲟⲗ ⲟ̅ⲗ̅ⲥ̅ⲏ̅ⲥ̅ ⲙ̅ⲛ̅ ϩⲩⲡⲛⲉⲩⲥ ⲙ̅ⲛ̅ <text:line-break/><text:span text:style-name="T1"> </text:span><text:span text:style-name="T2">(65/3) </text:span> ϩⲉⲩⲣⲩⲙⲁⲓⲟⲩⲥ ⲙ̅ⲛ̅ ⲛⲉⲧϩⲓϫ̅ⲛ̅ ⲧⲉϩⲓⲏ <text:line-break/><text:span text:style-name="T1"> </text:span><text:span text:style-name="T2">(65/4) </text:span> ⲛ̅ϣⲉ ⲉϩⲟⲩⲛ ⲉⲧⲁⲛⲁ{ⲩ}ⲡⲁⲩⲥⲓⲥ ⲙ̅ⲡⲱⲛϩ <text:line-break/><text:span text:style-name="T1"> </text:span><text:span text:style-name="T2">(65/5) </text:span> ⲛ̅ϣⲁ ⲉⲛⲉϩ · ⲛⲓⲡⲣⲩⲧⲁⲛⲓⲥ ⲙⲓⲝⲁⲛⲑⲏⲣ <text:line-break/><text:span text:style-name="T1"> </text:span><text:span text:style-name="T2">(65/6) </text:span> ⲙ̅ⲛ̅ ⲙⲓⲭⲁⲛⲟⲣⲁ ⲙ̅ⲛ̅ ⲛⲉⲧ%6ϩⲁⲣⲉϩ ⲉⲛⲉ‐ <text:line-break/><text:span text:style-name="T1"> </text:span><text:span text:style-name="T2">(65/7) </text:span> ⲯⲩⲭⲟⲟⲩⲉ ⲛ̅ⲛ̅ⲥⲱⲧ%6ⲡ%6 ⲁⲕⲣⲁⲙⲁⲛ ⲙ̅ⲛ̅ <text:line-break/><text:span text:style-name="T1"> </text:span><text:span text:style-name="T2">(65/8) </text:span> ⲥⲧⲣⲉⲙⲯⲟⲩⲭⲟⲥ ⲙ̅ⲛ̅ ⲧⲛⲟϭ ⲛ̅ⲇⲩⲛⲁⲙⲓⲥ <text:line-break/><text:span text:style-name="T1"> </text:span><text:span text:style-name="T2">(65/9) </text:span> ϩ̅ⲏ̅ⲗ̅ⲓ̅ ϩ̅ⲏⲗⲓ̅ ⲙⲁⲭⲁⲣ ⲙⲁⲭⲁⲣ ⲥⲏⲑ ⲙ̅ⲛ̅ <text:line-break/><text:span text:style-name="T1"> </text:span><text:span text:style-name="T2">(65/10) </text:span> ⲡⲛⲟϭ ⲛ̅ⲁϩⲟⲣⲁⲧⲟⲥ ⲛ̅ⲁⲕⲗⲏⲧⲟⲛ ⲛ̅ⲁⲧⲟ‐ <text:line-break/><text:span text:style-name="T1"> </text:span><text:span text:style-name="T2">(65/11) </text:span> ⲛⲟⲙⲁⲍⲉ ⲙ̅ⲙⲟϥ ⲙ̅ⲡⲁⲣⲑⲉⲛⲓⲕⲟⲛ ⲙ̅‐ <text:line-break/><text:span text:style-name="T1"> </text:span><text:span text:style-name="T2">(65/12) </text:span> ⲡ̅ⲛ̅ⲁ̅ ⲙ̅ⲛ̅ ⲧⲥⲓⲅⲏ ⲙ̅ⲛ̅ ⲡⲛⲟϭ ⲛ̅ⲟⲩⲟⲉⲓⲛ <text:line-break/><text:span text:style-name="T1"> </text:span><text:span text:style-name="T2">(65/13) </text:span> ϩⲁⲣⲙⲟⲍⲏⲗ · ⲡⲙⲁ ⲙ̅ⲡⲁⲩⲧⲟⲅⲉⲛⲏⲥ ⲉ‐ <text:line-break/><text:span text:style-name="T1"> </text:span><text:span text:style-name="T2">(65/14) </text:span> ⲧⲟⲛϩ ⲡⲛⲟⲩⲧⲉ ⲛ̅ⲧⲙⲏⲉ ⲙ̅ⲛ̅ 〈ⲡ〉ⲉⲧ{ⲛ̅}ⲛ̅ⲙ <text:line-break/><text:span text:style-name="T1"> </text:span><text:span text:style-name="T2">(65/15) </text:span> ⲙⲁϥ ⲡⲁⲫⲑⲁⲣⲧⲟⲥ ⲛ̅ⲣⲱⲙⲉ ⲁⲇⲁⲙⲁⲥ · <text:line-break/><text:span text:style-name="T1"> </text:span><text:span text:style-name="T2">(65/16) </text:span> ⲡⲙⲉϩⲥⲛⲁⲩ ⲟ̅ⲣ̅ⲟ̅ⲓ̅̈̅ⲁ̅ⲏ̅ⲗ̅ ⲡⲙⲁ ⲙ̅ⲡⲛⲟϭ <text:line-break/><text:span text:style-name="T1"> </text:span><text:span text:style-name="T2">(65/17) </text:span> ⲛ̅ⲥⲏⲑ· ⲙ̅ⲛ̅ ⲓ̅ⲥ̅ ⲡⲁ ⲡⲱⲛϩ· ⲙ̅ⲛ̅ ⲡⲉⲛⲧⲁϥ‐ <text:line-break/><text:span text:style-name="T1"> </text:span><text:span text:style-name="T2">(65/18) </text:span> {ⲉ̅ⲓ} ⲁϥⲥⲧⲁⲩⲣⲟⲩ ⲙ̅ⲡⲉⲧϩ̅ⲙ̅ ⲡⲛⲟⲙⲟⲥ <text:line-break/><text:span text:style-name="T1"> </text:span><text:span text:style-name="T2">(65/19) </text:span> ⲡⲙⲉϩϣⲟⲙ̅ⲛ̅ⲧ̅ ⲇⲁⲩⲉⲓⲑⲉ ⲡⲙⲁ ⲛ̅ⲛ̅‐ <text:line-break/><text:span text:style-name="T1"> </text:span><text:span text:style-name="T2">(65/20) </text:span> ϣⲏⲣⲉ ⲙ̅ⲡⲛⲟϭ ⲛ̅ⲥⲏⲑ · ⲡⲙⲉϩϥⲧⲟⲟⲩ <text:line-break/><text:span text:style-name="T1"> </text:span><text:span text:style-name="T2">(65/21) </text:span> ⲏⲗⲉⲗⲏⲑ· ⲡⲙⲁ ⲉⲧⲉⲣⲉⲛ̅ⲯⲩⲭⲟⲟⲩⲉ <text:line-break/><text:span text:style-name="T1"> </text:span><text:span text:style-name="T2">(65/22) </text:span> ⲛ̅ⲛ̅ϣⲏⲣⲉ ⲙ̅ⲧⲟⲛ ⲙ̅ⲙⲟⲟⲩ ⲛ̅ϩⲏⲧ̅ϥ̅ · <text:line-break/><text:span text:style-name="T1"> </text:span><text:span text:style-name="T2">(65/23) </text:span> ⲡⲙⲉϩϯⲟⲩ ⲓ̅̈̅ⲱ̅ⲏ̅ⲗ̅ ⲡⲉⲧϩⲓϫ̅ⲙ̅ ⲡⲣⲁⲛ <text:line-break/><text:span text:style-name="T1"> </text:span><text:span text:style-name="T2">(65/24) </text:span> ⲙ̅ⲡⲉⲧⲟⲩⲛⲁⲧⲁⲁⲥ ⲛⲁϥ ⲉϫⲱⲕ̅ⲙ̅ ϩ̅ⲙ̅ <text:line-break/><text:span text:style-name="T1"> </text:span><text:span text:style-name="T2">(65/25) </text:span> ⲡⲃⲁⲡⲧⲓⲥⲙⲁ ⲉⲧⲟⲩⲁⲁⲃ ⲉⲧⲟⲩⲁⲧ̅ⲃ̅ ⲉⲧⲡⲉ‐ <text:line-break/><text:span text:style-name="T1"> </text:span><text:span text:style-name="T2">(65/26) </text:span> ⲡⲓⲁⲫⲑⲁⲣⲧⲟⲥ ⲁⲗⲗⲁ ϫ̅ⲛ̅ ⲛ̅ϯⲛⲟⲩ <text:line-break/><text:span text:style-name="T1"> </text:span><text:span text:style-name="T2">(66/1) </text:span> ϩⲓⲧ̅ⲙ̅ ⲡⲓⲣⲱⲙⲉ ⲛ̅ⲁⲫⲑⲁⲣⲧⲟⲥ ⲡⲟⲓ‐ <text:line-break/><text:span text:style-name="T1"> </text:span><text:span text:style-name="T2">(66/2) </text:span> ⲙⲁⲏⲗ · ⲙ̅ⲛ̅ ⲛⲉⲧ̅ⲙ̅ⲡϣⲁ ⲛ̅ⲉⲡⲓⲕⲗⲏⲥⲓⲥ <text:line-break/><text:span text:style-name="T1"> </text:span><text:span text:style-name="T2">(66/3) </text:span> ⲛⲁⲡⲟⲧⲁⲝⲓⲥ ⲛ̅ⲧϯⲉ ⲛ̅ⲥⲫⲣⲁⲅⲓⲥ ϩ̅ⲙ̅ <text:line-break/><text:span text:style-name="T1"> </text:span><text:span text:style-name="T2">(66/4) </text:span> ⲡⲓⲃⲁⲡⲧⲓⲥⲙⲁ ⲙ̅ⲡⲏⲅⲏ ⲛⲉⲉⲓ ⲉⲩⲛⲁ <text:line-break/><text:span text:style-name="T1"> </text:span><text:span text:style-name="T2">(66/5) </text:span> ⲥⲟⲩⲛ̅ ⲛⲉⲩⲡⲁⲣⲁⲗⲏⲙⲡⲧⲱⲣ · ⲛ̅ⲑⲉ <text:line-break/><text:span text:style-name="T1"> </text:span><text:span text:style-name="T2">(66/6) </text:span> ⲉⲧ̅ⲥ̅ⲧⲥⲁⲃⲟ ⲙ̅ⲙⲟⲟⲩ ⲉⲣⲟⲟⲩ ⲛ̅ⲥⲉ <text:line-break/><text:span text:style-name="T1"> </text:span><text:span text:style-name="T2">(66/7) </text:span> ⲥⲟⲩⲱⲛⲟⲩ ⲉⲃⲟⲗ ϩⲓⲧⲟⲟⲧⲟⲩ ⲛⲁⲓ̈ <text:line-break/><text:span text:style-name="T1"> </text:span><text:span text:style-name="T2">(66/8) </text:span> ⲛ̅ⲛⲉⲩϫⲓ ϯⲡⲉ ⲙ̅ⲡⲙⲟⲩ ⲓ̅ⲏ̅ ⲓ̅ⲉⲩⲥ̅ <text:line-break/><text:span text:style-name="T1"> </text:span><text:span text:style-name="T2">(66/9) </text:span> ⲏ̅ⲱ̅ ⲟ̅ⲩ̅ ⲏ̅ⲱ̅ ⲱⲩⲁ · ⲁⲗⲏⲑⲱⲥ ⲁⲗⲏⲑⲱⲥ <text:line-break/><text:span text:style-name="T1"> </text:span><text:span text:style-name="T2">(66/10) </text:span> ⲓ̅ⲉ̅ⲥ̅ⲥ̅ⲉ̅ⲩ̅ ⲙ̅ⲁⲍⲁⲣⲉⲩ̅ ⲓⲉⲥⲥⲉⲇⲉⲕⲉⲩ <text:line-break/><text:span text:style-name="T1"> </text:span><text:span text:style-name="T2">(66/11) </text:span> ⲡⲙⲟⲟⲩ ⲉⲧⲟⲛϩ ⲡⲁⲗⲟⲩ ⲙ̅ⲡⲁⲗⲟⲩ <text:line-break/><text:span text:style-name="T1"> </text:span><text:span text:style-name="T2">(66/12) </text:span> ⲡⲣⲁⲛ ⲉⲑⲁⲉⲟⲟⲩ ⲁⲗⲏⲑⲱⲥ ⲁⲗⲏⲑⲱⲥ <text:line-break/><text:span text:style-name="T1"> </text:span><text:span text:style-name="T2">(66/13) </text:span> ⲁⲓⲱⲛⲟⲱⲛ ⲓ̅ⲓ̅ⲓ̅ⲓ̅ ⲏ̅ⲏⲏⲏ̅ ⲉ̅ⲉⲉⲉ̅ ⲟ̅ⲟ̅‐ <text:line-break/><text:span text:style-name="T1"> </text:span><text:span text:style-name="T2">(66/14) </text:span> ⲟ̅ⲟ̅ ⲩ̅ⲩⲩⲩ̅ ⲱ̅ⲱⲱⲱ̅ ⲁ̅ⲁⲁⲁ{ⲁ}̅ ⲁ‐ <text:line-break/><text:span text:style-name="T1"> </text:span><text:span text:style-name="T2">(66/15) </text:span> ⲗⲏⲑⲉⲥ ⲁⲗⲏⲑⲱⲥ ⲏ̅ⲓ̅ ⲁ̅ⲁⲁⲁ̅ ⲱ̅ⲱ̅‐ <text:line-break/><text:span text:style-name="T1"> </text:span><text:span text:style-name="T2">(66/16) </text:span> ⲱ̅ⲱ̅ ⲡⲉⲧϣⲟⲟⲡ%6 ⲉⲧⲛⲁⲩ ⲉⲛⲁⲓⲱⲛ <text:line-break/><text:span text:style-name="T1"> </text:span><text:span text:style-name="T2">(66/17) </text:span> ⲁⲗⲏⲑⲉⲥ ⲁⲗⲏⲑⲱⲥ ⲁ̅ⲉ̅ⲉ̅ ⲏ̅ⲏⲏ̅ ⲓ̅ⲓⲓⲓ̅ <text:line-break/><text:span text:style-name="T1"> </text:span><text:span text:style-name="T2">(66/18) </text:span> ⲩ̅ⲩ̅ⲩ̅ⲩ̅ⲩ̅ⲩ̅ ⲱ ⲱ ⲱ ⲱ ⲱ ⲱ ⲱ ⲱ <text:line-break/><text:span text:style-name="T1"> </text:span><text:span text:style-name="T2">(66/19) </text:span> ⲡⲉⲧϣⲟⲟⲡ%6 ⲛ̅ϣⲁ ⲁⲛⲏϩⲉ ⲛ̅ⲉⲛⲉϩ <text:line-break/><text:span text:style-name="T1"> </text:span><text:span text:style-name="T2">(66/20) </text:span> ⲁⲗⲏⲑⲉⲥ ⲁⲗⲏⲑⲱⲥ ⲓ̅ⲏ̅ⲁ̅ ⲁ̅ⲓⲱ̅ ϩ̅ⲙ̅ <text:line-break/><text:soft-page-break/><text:span text:style-name="T1"> </text:span><text:span text:style-name="T2">(66/21) </text:span> ⲫⲏⲧ ⲡⲉⲧϣⲟⲟⲡ%6 ⲩ̅ⲁ̅ⲉ̅ⲓ̅ ⲉ̅ⲓⲥⲁⲉⲓ̅ <text:line-break/><text:span text:style-name="T1"> </text:span><text:span text:style-name="T2">(66/22) </text:span> ⲉ̅ⲓ̅ⲟ̅ⲉ̅ⲓ̅ ⲉ̅ⲓⲟⲥⲉⲓ̅ ⲡⲉⲉⲓⲛⲁϭ ⲛ̅ⲣⲁⲛ <text:line-break/><text:span text:style-name="T1"> </text:span><text:span text:style-name="T2">(66/23) </text:span> ⲉⲧ̅ⲛ̅ⲧⲁⲕ ϩⲓϫⲱⲉⲓ ⲡⲓⲁⲧϣⲱⲱⲧ%6 <text:line-break/><text:span text:style-name="T1"> </text:span><text:span text:style-name="T2">(66/24) </text:span> ⲛ̅ⲁⲩⲧⲟⲅⲉⲛⲏⲥ ⲡⲁⲓ̈ ⲉⲧ̅ⲙ̅ⲡⲁⲃⲟⲗ ⲁⲛ <text:line-break/><text:span text:style-name="T1"> </text:span><text:span text:style-name="T2">(66/25) </text:span> ⲉⲉⲓⲛⲁⲩ ⲉⲣⲟⲕ ⲡⲓⲁⲧ%6ⲛⲁⲩ ⲉⲣⲟϥ ⲛ̅‐ <text:line-break/><text:span text:style-name="T1"> </text:span><text:span text:style-name="T2">(66/26) </text:span> ⲛⲁϩⲣ̅ⲛ̅ ⲟⲩⲟⲛ 〈ⲛ〉ⲓⲙ ⲛⲓⲙ ⲅⲁⲣ ⲡⲉⲧⲛⲁϣ‐ <text:line-break/><text:span text:style-name="T1"> </text:span><text:span text:style-name="T2">(66/27) </text:span> ⲭⲱⲣⲓ ⲙ̅ⲙⲟⲕ ϩ̅ⲛ̅ ⲕⲉⲥⲙⲏ ⲧⲉⲛⲟⲩ‐ <text:line-break/><text:span text:style-name="T1"> </text:span><text:span text:style-name="T2">(67/1) </text:span> ϫⲉ ⲁⲉⲓⲥⲟⲩⲱⲛⲕ ⲁⲉⲓⲙⲟⲩϫⲧ%6 ⲙ̅ⲙⲟ‐ <text:line-break/><text:span text:style-name="T1"> </text:span><text:span text:style-name="T2">(67/2) </text:span> ⲉⲓ ⲉⲡⲉⲧⲉ ⲙⲉϥϣⲓⲃⲉ ⲁⲉⲓϩⲟⲡⲗⲓⲍⲉ <text:line-break/><text:span text:style-name="T1"> </text:span><text:span text:style-name="T2">(67/3) </text:span> ⲙ̅ⲙⲟⲉⲓ ϩ̅ⲛ̅ ⲟⲩϩⲟⲡⲗⲟⲛ ⲛ̅ⲟⲩⲟⲉⲓⲛ <text:line-break/><text:span text:style-name="T1"> </text:span><text:span text:style-name="T2">(67/4) </text:span> ⲁⲉⲓⲣ̅ⲟⲩⲟⲉⲓⲛ ⲛⲉⲣⲉⲧⲙⲁⲁⲩ ⲅⲁⲣ ⲙ̅‐ <text:line-break/><text:span text:style-name="T1"> </text:span><text:span text:style-name="T2">(67/5) </text:span> ⲡⲙⲁ ⲉⲧ̅ⲙ̅ⲙⲁⲩ ⲉⲧⲃⲉ ϯⲙ̅ⲛⲧ̅ⲥⲁⲉⲓ‐ <text:line-break/><text:span text:style-name="T1"> </text:span><text:span text:style-name="T2">(67/6) </text:span> ⲉ ⲉⲧⲛⲉⲥⲱⲥ ⲛ̅ⲧⲉ ⲡⲉϩⲙⲟⲧ%6 ⲉⲧⲃⲉ <text:line-break/><text:span text:style-name="T1"> </text:span><text:span text:style-name="T2">(67/7) </text:span> ⲡⲉⲓ̈ ⲁⲉⲓⲡⲱⲣϣ ⲛ̅ⲛⲁϭⲓϫ ⲉⲃⲟⲗ ⲉⲩ‐ <text:line-break/><text:span text:style-name="T1"> </text:span><text:span text:style-name="T2">(67/8) </text:span> ⲕⲏⲃ · ⲁⲉⲓϫⲓ ⲙⲟⲣⲫⲏ ϩ̅ⲙ̅ ⲡⲕⲩⲕⲗⲟⲥ <text:line-break/><text:span text:style-name="T1"> </text:span><text:span text:style-name="T2">(67/9) </text:span> ⲛ̅ⲧⲙ̅ⲛ̅ⲧ̅ⲣ̅ⲙ̅ⲙⲁⲟ ⲙ̅ⲡⲟⲩⲟⲉⲓⲛ ⲉϥϩ̅ⲛ̅ <text:line-break/><text:span text:style-name="T1"> </text:span><text:span text:style-name="T2">(67/10) </text:span> ⲕⲟⲩⲟⲩⲛⲧ%6 ⲉϥϯ ⲙⲟⲣⲫⲏ ⲙ̅ⲡⲓⲁⲧⲟ <text:line-break/><text:span text:style-name="T1"> </text:span><text:span text:style-name="T2">(67/11) </text:span> ⲛ̅ϫⲡⲟ ϩ̅ⲙ̅ ⲡⲟⲩⲟⲉⲓⲛ ⲉⲧⲉ ⲙ̅ⲛ̅ ⲉⲛⲕⲗⲏ <text:line-break/><text:span text:style-name="T1"> </text:span><text:span text:style-name="T2">(67/12) </text:span> ⲙⲁ ϫⲓ ⲉϩⲟⲩⲛ ⲉⲣⲟϥ ϯⲛⲁϫⲱ ⲙ̅ⲡⲉ <text:line-break/><text:span text:style-name="T1"> </text:span><text:span text:style-name="T2">(67/13) </text:span> ⲕⲉⲟⲟⲩ ⲁⲗⲏⲑⲱⲥ ϫⲉ ⲁⲉⲓⲣ̅ⲭⲱⲣⲓ ⲙ̅‐ <text:line-break/><text:span text:style-name="T1"> </text:span><text:span text:style-name="T2">(67/14) </text:span> ⲙⲟⲕ ⲥ̣ⲟⲩ ⲓ̅ⲏ̅ⲥ̅ ⲓ̅ⲇⲉ̅ ⲁ̅ⲉⲓⲱ̅ ⲁ̅ⲉⲓⲉ̅ ⲟ̅ⲓⲥ̅ ⲱ̅̅ <text:line-break/><text:span text:style-name="T1"> </text:span><text:span text:style-name="T2">(67/15) </text:span> ⲁ̅ⲓ̅ⲱ̅ⲛ̅ ⲁ̅ⲓⲱⲛ̅ ⲡⲛⲟⲩⲧⲉ ⲛ̅ⲧⲥⲓⲅⲏ ϯ <text:line-break/><text:span text:style-name="T1"> </text:span><text:span text:style-name="T2">(67/16) </text:span> ⲁⲝⲓⲟⲩ ⲙ̅ⲙⲟⲕ ⲧⲏⲣⲕ ⲛ̅ⲧⲟⲕ ⲡⲉ ⲡⲁ <text:line-break/><text:span text:style-name="T1"> </text:span><text:span text:style-name="T2">(67/17) </text:span> ⲙⲁ ⲛ̅ⲙ̅ⲧⲟⲛ ⲡϣⲏⲣⲉ ⲏ̅ⲥ̅ ⲏ̅ⲥ̅ ⲟ̅ ⲉ̅ ⲡⲓ <text:line-break/><text:span text:style-name="T1"> </text:span><text:span text:style-name="T2">(67/18) </text:span> ⲁⲧ̅ⲥ̅ⲙⲟⲧ%6 ⲉⲧϣⲟⲟⲡ ϩ̅ⲛ̅ ⲛⲓⲁⲧ̅ⲥ̅ⲙⲟⲧ%6 <text:line-break/><text:span text:style-name="T1"> </text:span><text:span text:style-name="T2">(67/19) </text:span> ⲉϥϣⲟⲟⲡ ⲉϥⲧⲟⲩⲛⲟⲥ ⲙ̅ⲡⲣⲱⲙⲉ <text:line-break/><text:span text:style-name="T1"> </text:span><text:span text:style-name="T2">(67/20) </text:span> ⲉⲧⲕⲛⲁⲧⲟⲩⲃⲟⲉⲓ ⲛ̅ϩⲏⲧ̅ϥ̅ ⲉϩⲟⲩⲛ <text:line-break/><text:span text:style-name="T1"> </text:span><text:span text:style-name="T2">(67/21) </text:span> ⲉⲡⲉⲕⲱⲛϩ · ⲕⲁⲧⲁ ⲡⲉⲕⲣⲁⲛ ⲉⲧⲉ ⲙⲉϥ‐ <text:line-break/><text:span text:style-name="T1"> </text:span><text:span text:style-name="T2">(67/22) </text:span> ⲱϫ̅ⲛ̅ ⲉⲧⲃⲉ ⲡⲁⲓ̈ ⲡⲉⲥⲧⲟⲉⲓ ⲙ̅ⲡⲱⲛϩ <text:line-break/><text:span text:style-name="T1"> </text:span><text:span text:style-name="T2">(67/23) </text:span> ⲛ̅ϩⲏⲧ%6 ⲁⲉⲓⲕⲉⲣⲁ ⲙ̅ⲙⲟϥ ϩ̅ⲛ̅ ⲟⲩⲙⲟ <text:line-break/><text:span text:style-name="T1"> </text:span><text:span text:style-name="T2">(67/24) </text:span> [ⲟ]ⲩ ⲉⲡⲧⲩⲡⲟⲥ ⲛ̅ⲛ̅ⲁⲣⲭⲱⲛ ⲧⲏⲣⲟⲩ <text:line-break/><text:span text:style-name="T1"> </text:span><text:span text:style-name="T2">(67/25) </text:span> ϫⲉ ⲉⲉⲓⲛⲁⲱⲛϩ ϩⲁⲧⲏⲕ ϩ̅ⲛ̅ ϯⲣⲏⲛⲏ <text:line-break/><text:span text:style-name="T1"> </text:span><text:span text:style-name="T2">(67/26) </text:span> ⲛ̅ⲛⲉⲧⲟⲩⲁⲁⲃ ⲡⲉⲧϣⲟⲟⲡ ⲛ̅ϣⲁ ⲉⲛⲉϩ <text:line-break/><text:span text:style-name="T1"> </text:span><text:span text:style-name="T2">(68/1) </text:span> ⲁⲗⲏⲑⲱⲥ ⲁⲗⲏⲑⲱⲥ ⲧⲁⲓ̈ ⲧⲉ ⲧⲃⲓⲃⲗⲟⲥ <text:line-break/><text:span text:style-name="T1"> </text:span><text:span text:style-name="T2">(68/2) </text:span> ⲛ̅ⲧⲁϥⲥⲁϩⲥ ⲛ̅ϭⲓ ⲡⲛⲟϭ ⲛ̅ⲥ̅ⲏ̅ⲑ̅ ⲁϥⲕⲱ <text:line-break/><text:span text:style-name="T1"> </text:span><text:span text:style-name="T2">(68/3) </text:span> ⲙ̅ⲙⲟⲥ ϩ̅ⲛ̅ ϩⲉⲛⲧⲟⲟⲩ ⲉⲩϫⲟⲥⲉ ⲉⲙ̅‐ <text:line-break/><text:span text:style-name="T1"> </text:span><text:span text:style-name="T2">(68/4) </text:span> ⲡⲉⲡⲣⲏ ϣⲁ ⲉϫⲱⲟⲩ ⲟⲩⲇⲉ ⲉⲙ̅ⲛ̅‐ <text:line-break/><text:span text:style-name="T1"> </text:span><text:span text:style-name="T2">(68/5) </text:span> ϭⲟⲙ · ⲁⲩⲱ ϫⲓⲛ ⲛⲉϩⲟⲟⲩ ⲛ̅ⲛⲉⲡⲣⲟ‐ <text:line-break/><text:span text:style-name="T1"> </text:span><text:span text:style-name="T2">(68/6) </text:span> ⲫⲏⲧⲏⲥ ⲙ̅ⲛ̅ ⲛⲁⲡⲟⲥⲧⲟⲗⲟⲥ ⲙ̅ⲛ̅ ⲛ̅‐ <text:line-break/><text:span text:style-name="T1"> </text:span><text:span text:style-name="T2">(68/7) </text:span> ⲕⲏⲣⲩⲝ ⲙ̅ⲡⲉⲡⲣⲉ→ⲛ← ϩⲟⲗⲱⲥ ⲧⲁⲗⲟ <text:line-break/><text:span text:style-name="T1"> </text:span><text:span text:style-name="T2">(68/8) </text:span> ⲉϫ̅ⲛ̅ ⲛⲉⲩϩⲩⲧ%6 ⲟⲩⲧⲉ ⲙ̅ⲛ̅ ϣϭⲟⲙ <text:line-break/><text:span text:style-name="T1"> </text:span><text:span text:style-name="T2">(68/9) </text:span> ⲁⲩⲱ ⲙ̅ⲡⲉⲡⲉⲩⲙⲁϫⲉ ⲥⲱⲧ̅ⲙ̅ ⲉⲣⲟϥ <text:line-break/><text:span text:style-name="T1"> </text:span><text:span text:style-name="T2">(68/10) </text:span> ⲧⲉⲉⲓⲃⲓⲃⲗⲟⲥ ⲁϥⲥⲁϩ̅ⲥ̅ ⲛ̅ϭⲓ ⲡⲛⲟϭ <text:line-break/><text:span text:style-name="T1"> </text:span><text:span text:style-name="T2">(68/11) </text:span> ⲛ̅ⲥⲏⲑ · ϩ̅ⲛ̅ ϩⲉⲛⲥϩⲁⲓ̈ ⲛ̅ϣⲉⲙⲁⲁⲃ <text:line-break/><text:span text:style-name="T1"> </text:span><text:span text:style-name="T2">(68/12) </text:span> ⲛ̅ⲣⲟⲙⲡⲉ ⲁϥⲕⲱ ⲙ̅ⲙⲟⲥ ϩ̅ⲙ̅ ⲡⲧⲟ‐ <text:line-break/><text:span text:style-name="T1"> </text:span><text:span text:style-name="T2">(68/13) </text:span> {ⲟ}ⲟⲩ ⲉϣⲁⲩⲙⲟⲩⲧⲉ ⲉⲣⲟϥ ϫⲉ ⲭⲁ‐ <text:line-break/><text:span text:style-name="T1"> </text:span><text:span text:style-name="T2">(68/14) </text:span> ⲣⲁⲝⲓⲱ ϫⲉⲕⲁⲁⲥ ϩ̅ⲛ̅ ⲛ̅ϩⲁⲉ ⲛ̅ⲛⲉ‐ <text:line-break/><text:soft-page-break/><text:span text:style-name="T1"> </text:span><text:span text:style-name="T2">(68/15) </text:span> ⲭⲣⲟⲛⲟⲥ ⲙ̅ⲛ̅ ⲛ̅ⲕⲉⲣⲟⲥ ϩ̅ⲙ̅ ⲡⲉⲑⲉ‐ <text:line-break/><text:span text:style-name="T1"> </text:span><text:span text:style-name="T2">(68/16) </text:span> ⲗⲏⲙⲁ ⲙ̅ⲡⲁⲩⲧⲟⲅⲉⲛⲏⲥ ⲛ̅ⲛⲟⲩⲧⲉ <text:line-break/><text:span text:style-name="T1"> </text:span><text:span text:style-name="T2">(68/17) </text:span> ⲙ̅ⲛ̅ ⲡⲉⲡⲗⲏⲣⲱⲙⲁ ⲧⲏⲣ̅ϥ̅ ϩⲓⲧ̅ⲙ̅ ⲡϯ‐ <text:line-break/><text:span text:style-name="T1"> </text:span><text:span text:style-name="T2">(68/18) </text:span> ⲛ̅ⲡⲟⲩⲱϣⲉ ⲛ̅ⲁⲧ̅ⲛ̅ ⲣⲁⲧ̅ϥ̅ · ⲛ̅ⲁⲧ%6 <text:line-break/><text:span text:style-name="T1"> </text:span><text:span text:style-name="T2">(68/19) </text:span> ⲙⲉⲟⲩⲉ ⲉⲣⲟϥ ⲛ̅ⲉⲓⲱⲧ%6 ⲉϥ〈ⲉ〉ⲡⲣⲟ <text:line-break/><text:span text:style-name="T1"> </text:span><text:span text:style-name="T2">(68/20) </text:span> ⲉⲗⲑⲉ ⲉⲃⲟⲗ · ⲛ̅ϥ̅ⲟⲩⲱⲛϩ ⲛ̅ⲧⲉⲉⲓ <text:line-break/><text:span text:style-name="T1"> </text:span><text:span text:style-name="T2">(68/21) </text:span> ⲅⲉⲛⲉⲁ ⲛ̅ⲁⲫⲑⲁⲣⲧⲟⲥ ⲉⲧⲟⲩⲁⲁⲃ · <text:line-break/><text:span text:style-name="T1"> </text:span><text:span text:style-name="T2">(68/22) </text:span> ⲛ̅ⲧⲉ ⲡⲛⲟϭ ⲛ̅ⲥⲱⲧⲏⲣ ⲙ̅ⲛ̅ ⲛⲉⲧ%6 <text:line-break/><text:span text:style-name="T1"> </text:span><text:span text:style-name="T2">(68/23) </text:span> ϭⲁⲗⲏⲟⲩ ⲉⲣⲟⲟⲩ ϩ̅ⲛ̅ ⲟⲩⲁⲅⲁⲡⲏ ⲙ̅ⲛ̅ <text:line-break/><text:span text:style-name="T1"> </text:span><text:span text:style-name="T2">(68/24) </text:span> ⲡⲛⲟϭ ⲛ̅ⲁϩⲟⲣⲁⲧⲟⲥ ⲛ̅ϣⲁ ⲁⲛⲏϩ̣ⲉ̣ <text:line-break/><text:span text:style-name="T1"> </text:span><text:span text:style-name="T2">(68/25) </text:span> ⲙ̅ⲡ̅ⲛ̅ⲁ̅ ⲙ̅ⲛ̅ ⲡⲉϥⲙⲟⲛⲟⲅⲉⲛⲏⲥ <text:line-break/><text:span text:style-name="T1"> </text:span><text:span text:style-name="T2">(68/26) </text:span> ⲛ̅ϣⲏⲣⲉ ⲙ̅ⲛ̅ ⲡⲟⲩⲟⲉⲓⲛ ⲛ̅ϣⲁ ⲉ‐ <text:line-break/><text:span text:style-name="T1"> </text:span><text:span text:style-name="T2">(69/1) </text:span> ⲛⲉϩ ⲙ̅ⲛ̅ ⲧⲉϥⲛⲟϭ ⲛ̅ⲥⲩⲛⲍⲩⲅⲟⲥ <text:line-break/><text:span text:style-name="T1"> </text:span><text:span text:style-name="T2">(69/2) </text:span> ⲛ̅ⲁⲫⲑⲁⲣⲧⲟⲥ ⲙ̅ⲛ̅ ⲧⲁⲫⲑⲁⲣⲧⲟⲥ ⲛ̅‐ <text:line-break/><text:span text:style-name="T1"> </text:span><text:span text:style-name="T2">(69/3) </text:span> ⲥⲟⲫⲓⲁ ⲙ̅ⲛ̅ ⲧⲃⲁⲣⲃⲏⲗⲟⲛ ⲙ̅ⲛ̅ ⲟⲩⲡⲗⲏ‐ <text:line-break/><text:span text:style-name="T1"> </text:span><text:span text:style-name="T2">(69/4) </text:span> ⲣⲱⲙⲁ ⲧⲏⲣϥ ϩ̅ⲛ̅ ⲟⲩⲙ̅ⲛⲧ̅ϣⲁ ⲉⲛⲉϩ· <text:line-break/><text:span text:style-name="T1"> </text:span><text:span text:style-name="T2">(69/5) </text:span> ϩⲁⲙⲏⲛ <text:line-break/><text:span text:style-name="T1"> </text:span><text:span text:style-name="T2">(69/6) </text:span> ⲡⲉⲩⲁⲅ%3ⲅⲉⲗⲓⲟⲛ 〈ⲛ̅〉ⲛ̅ⲣ̅ⲙ̅ⲛ̅ⲕⲏⲙⲉ <text:line-break/><text:span text:style-name="T1"> </text:span><text:span text:style-name="T2">(69/7) </text:span> ⲧⲃⲓⲃⲗⲟⲥ ⲛ̅ⲥϩⲁⲓ̈ ⲛ̅ⲛⲟⲩⲧⲉ ⲧϩⲓⲉ‐ <text:line-break/><text:span text:style-name="T1"> </text:span><text:span text:style-name="T2">(69/8) </text:span> ⲣⲁ ⲉⲧϩⲏⲡ%6 ⲧⲉⲭⲁⲣⲓⲥ ⲧⲥⲩⲛϩⲉⲥⲓⲥ <text:line-break/><text:span text:style-name="T1"> </text:span><text:span text:style-name="T2">(69/9) </text:span> ⲧⲉⲥⲑⲏⲥⲓⲥ ⲧⲉⲫⲣⲟⲛⲏⲥⲓⲥ ⲙ̅ⲛ̅ ⲡⲉ <text:line-break/><text:span text:style-name="T1"> </text:span><text:span text:style-name="T2">(69/10) </text:span> ⲣ̅ⲥϩⲏⲧ̅ⲥ̅ · ⲉⲩⲅⲛⲱⲥⲧⲟⲥ ⲡⲁⲅⲁⲡⲏ‐ <text:line-break/><text:span text:style-name="T1"> </text:span><text:span text:style-name="T2">(69/11) </text:span> ⲧⲓⲕⲟⲥ ϩ̅ⲙ̅ ⲡⲉⲡ̅ⲛⲁ̅ ϩ̅ⲛ̅ ⲧⲥⲁⲣⲝ · <text:line-break/><text:span text:style-name="T1"> </text:span><text:span text:style-name="T2">(69/12) </text:span> ⲡⲁⲣⲉⲛ ⲡⲉ ⲅⲟⲅ%3ⲅⲉⲥ→ⲥ←ⲟⲥ ⲙ̅ⲛ̅ ⲛⲁ‐ <text:line-break/><text:span text:style-name="T1"> </text:span><text:span text:style-name="T2">(69/13) </text:span> ϣⲃ̅ⲣ̅ⲟⲩⲟⲉⲓⲛ ϩ̅ⲛ̅ ⲟⲩⲁⲫⲑⲁⲣⲥⲓⲁ <text:line-break/><text:span text:style-name="T1"> </text:span><text:span text:style-name="T2">(69/14) </text:span> ⲓ̅ⲥ̅ ⲡⲉⲭ̅ⲥ̅ ⲡϣⲏⲣⲉ ⲙⲡⲛⲟⲩⲧⲉ <text:line-break/><text:span text:style-name="T1"> </text:span><text:span text:style-name="T2">(69/15) </text:span> ⲡⲥⲱⲧⲏⲣ · ⲓ̅ⲭ̅ⲑ̅ⲩ̅ⲥ̅ ⲑⲉⲟⲅⲣⲁⲫⲟⲥ <text:line-break/><text:span text:style-name="T1"> </text:span><text:span text:style-name="T2">(69/16) </text:span> ⲧⲃⲓⲃⲗⲟⲥ ⲧϩⲓⲉⲣⲁ ⲙ̅ⲡⲛⲟϭ ⲛ̅ⲁϩⲟ‐ <text:line-break/><text:span text:style-name="T1"> </text:span><text:span text:style-name="T2">(69/17) </text:span> ⲣⲁⲧⲟⲛ ⲙ̅ⲡ̅ⲛ̅ⲁ̅ ϩⲁⲙⲏⲛ <text:line-break/><text:span text:style-name="T1"> </text:span><text:span text:style-name="T2">(69/18) </text:span> 5̅0̅ⲧ̅ⲃ̅ⲓ̅50ⲃ5̅0ⲗⲟⲥ̅50 ⲧ5̅0ϩⲓⲉ̅505̅0ⲣⲁ ̅50ⲙ̅ⲡ5̅0ⲛⲟϭ̅50 <text:line-break/><text:span text:style-name="T1"> </text:span><text:span text:style-name="T2">(69/19) </text:span> ⲛ̅ⲁ5̅0̅ϩ̅ⲟ̅50ⲣ5̅0ⲁⲧⲟⲛ̅50 5̅0ⲙ̅ⲡ̅50ⲛ5̅0ⲉⲩ̅50‐ <text:line-break/><text:span text:style-name="T1"> </text:span><text:span text:style-name="T2">(69/20) </text:span> 5̅0̅ⲙ̅ⲁ̅50 ϩ5̅0ⲁⲙ̅50ⲏ5̅0ⲛ ̅50 </text:p>
      <text:p text:style-name="P1"/>
      <text:p text:style-name="P3">( codex III ) Eugnostos the Blessed</text:p>
      <text:p text:style-name="P2"><text:span text:style-name="T1"> </text:span><text:span text:style-name="T2">(70/1) </text:span> ⲉⲩⲅⲛⲱⲥⲧⲟⲥ ⲡⲙⲁⲕⲁⲣⲓⲟⲥ ⲛ̅ⲛⲉ‐ <text:line-break/><text:span text:style-name="T1"> </text:span><text:span text:style-name="T2">(70/2) </text:span> ⲧⲉ ⲛⲟⲩϥ ⲛⲉ ϫⲉ ⲣⲁϣⲉ ϩⲛ̅ ⲛⲉ‐ <text:line-break/><text:span text:style-name="T1"> </text:span><text:span text:style-name="T2">(70/3) </text:span> ⲉⲓ· ⲉⲧⲣⲉⲧⲛ̅ⲉⲓⲙⲉ ϫⲉ ⲣⲱⲙⲉ ⲛⲓⲙ <text:line-break/><text:span text:style-name="T1"> </text:span><text:span text:style-name="T2">(70/4) </text:span> ⲛ̅ⲧⲁⲩϫⲡⲟⲟⲩ ϫⲛ̅ ⲛ̅ⲧⲕⲁⲧⲁⲃⲟⲗⲏ <text:line-break/><text:span text:style-name="T1"> </text:span><text:span text:style-name="T2">(70/5) </text:span> ⲙ̅ⲡⲕⲟⲥⲙⲟⲥ ϣⲁ ⲧⲉⲛⲟⲩ ⲥⲉⲟ <text:line-break/><text:span text:style-name="T1"> </text:span><text:span text:style-name="T2">(70/6) </text:span> ⲛ̅ϣϩⲓϭ ⲉⲩϣⲓⲛⲉ ⲛ̅ⲥⲁ ⲡⲛⲟⲩ‐ <text:line-break/><text:span text:style-name="T1"> </text:span><text:span text:style-name="T2">(70/7) </text:span> ⲧⲉ ϫⲉ ⲛⲓⲙ ⲡⲉ ⲏ ⲟⲩⲉϣ ⲛ̅ϩⲉ ⲡⲉ <text:line-break/><text:span text:style-name="T1"> </text:span><text:span text:style-name="T2">(70/8) </text:span> ⲙ̅ⲡⲟⲩϩⲉ ⲉⲣⲟϥ ⲛ̅ⲥⲁⲃⲉⲉⲩⲉ ⲉⲧⲛ̅‐ <text:line-break/><text:span text:style-name="T1"> </text:span><text:span text:style-name="T2">(70/9) </text:span> ϩⲏⲧⲟⲩ ⲛ̅ϩⲟⲩⲟ ⲉⲃⲟⲗ ϩⲛ̅ ⲧⲇⲓⲟⲓⲕⲏ‐ <text:line-break/><text:span text:style-name="T1"> </text:span><text:span text:style-name="T2">(70/10) </text:span> ⲥⲓⲥ ⲙ̅ⲡⲕⲟⲥⲙⲟⲥ ⲁⲩϯ ⲧⲁⲛⲧⲛ̅ <text:line-break/><text:span text:style-name="T1"> </text:span><text:span text:style-name="T2">(70/11) </text:span> ⲉⲧⲙⲏⲉ ⲁⲩⲱ ⲙ̅ⲡⲉⲡⲧⲁⲛⲧⲛ̅ ⲧⲁ‐ <text:line-break/><text:span text:style-name="T1"> </text:span><text:span text:style-name="T2">(70/12) </text:span> ϩⲉ ⲧⲙⲏⲉ ⲧⲇⲓⲟⲓⲕⲏⲥⲓⲥ ⲛⲅⲁⲣ <text:line-break/><text:span text:style-name="T1"> </text:span><text:span text:style-name="T2">(70/13) </text:span> ϣⲁⲩϣⲁϫⲉ ⲉⲣⲟⲥ ⲛ̅ϣⲟⲙⲧⲉ ⲛ̅‐ <text:line-break/><text:span text:style-name="T1"> </text:span><text:span text:style-name="T2">(70/14) </text:span> ϭⲓⲛϣⲁϫⲉ ⲉⲃⲟⲗ ϩⲓⲧⲟⲟⲧⲟⲩ ⲛ̅‐ <text:line-break/><text:span text:style-name="T1"> </text:span><text:span text:style-name="T2">(70/15) </text:span> ⲛⲉⲫⲓⲗⲟⲥⲟⲫⲟⲥ ⲧⲏⲣⲟⲩ ⲉⲧⲃⲉ <text:line-break/><text:span text:style-name="T1"> </text:span><text:span text:style-name="T2">(70/16) </text:span> ⲡⲁⲓ̈ ⲛ̅ⲥⲉⲥⲩⲙⲫⲱⲛⲉⲓ ⲁⲛ ϩⲟⲉⲓ‐ <text:line-break/><text:span text:style-name="T1"> </text:span><text:span text:style-name="T2">(70/17) </text:span> ⲛⲉ ⲛ̅ⲅⲁⲣ ⲛ̅ϩⲏⲧⲟⲩ ⲥⲉϫⲱ ⲙ̅ⲙⲟⲥ <text:line-break/><text:span text:style-name="T1"> </text:span><text:span text:style-name="T2">(70/18) </text:span> ⲉⲡⲕⲟⲥⲙⲟⲥ ϫⲉ ⲛ̅ⲧⲁⲩⲁⲅⲉ ⲙ̅ⲙⲟϥ <text:line-break/><text:span text:style-name="T1"> </text:span><text:span text:style-name="T2">(70/19) </text:span> ϩⲓⲧⲟⲟⲧϥ̅ ⲙ̅ⲙⲓⲛ ⲙ̅ⲙⲟϥ· ϩⲉⲛ‐ <text:line-break/><text:span text:style-name="T1"> </text:span><text:span text:style-name="T2">(70/20) </text:span> ⲕⲟⲟⲩⲉ ϫⲉ ⲟⲩⲡⲣⲟⲛⲟⲓⲁ ⲧⲉ· ϩⲉⲛ‐ <text:line-break/><text:span text:style-name="T1"> </text:span><text:span text:style-name="T2">(70/21) </text:span> ⲕⲟⲟⲩⲉ ϫⲉ ⲟⲩⲡⲉⲧⲏⲡ%6 ⲉϣⲱⲡⲉ <text:line-break/><text:span text:style-name="T1"> </text:span><text:span text:style-name="T2">(70/22) </text:span> ⲡⲉ ⲁⲩⲱ ⲟⲩⲟⲛ ⲛ̅ⲛⲁⲓ̈ ⲁⲛ ⲛⲉ <text:line-break/><text:span text:style-name="T1"> </text:span><text:span text:style-name="T2">(70/23) </text:span> ⲧϣⲟⲙⲧⲉ ϭⲉ ⲛ̅ⲥⲙⲏ ⲛ̅ⲧⲁⲉⲓⲣ̅ <text:line-break/><text:span text:style-name="T1"> </text:span><text:span text:style-name="T2">(70/24) </text:span> ϣⲣⲡ%6 ⲛ̅ϫⲟⲟⲩ ⲙⲛ̅ ⲟⲩ{ⲉ̅ⲓ} ⲙ̅ⲙⲟⲟⲩ <text:line-break/><text:span text:style-name="T1"> </text:span><text:span text:style-name="T2">(71/1) </text:span> ⲏⲡ%6 ⲉⲧⲙⲏⲉ· ⲡⲉⲧⲉⲃⲟⲗ ⲅⲁⲣ ϩⲓⲧⲟ‐ <text:line-break/><text:span text:style-name="T1"> </text:span><text:span text:style-name="T2">(71/2) </text:span> ⲟⲧϥ̅ ⲙ̅ⲙⲓⲛ ⲙ̅ⲙⲟϥ ⲟⲩⲃⲓⲟⲥ ⲉϥ‐ <text:line-break/><text:span text:style-name="T1"> </text:span><text:span text:style-name="T2">(71/3) </text:span> ϣⲟⲩⲉⲓⲧ%6 ⲡⲉ ϣⲁϥⲁⲁϥ ⲧⲉⲡⲣⲟ‐ <text:line-break/><text:span text:style-name="T1"> </text:span><text:span text:style-name="T2">(71/4) </text:span> ⲛⲟⲓⲁ ⲟⲩⲙⲛ̅ⲧⲥⲟϭ ⲧⲉ ⲧⲉⲧϩⲁⲛⲧ%6 <text:line-break/><text:span text:style-name="T1"> </text:span><text:span text:style-name="T2">(71/5) </text:span> ⲟⲩ〈{ⲉ̅ⲓ} ⲉ〉ⲙⲉⲥⲉⲥⲑⲁⲛⲉⲧⲉ· ⲡⲉⲧⲉ ⲟⲩⲛ ϣ <text:line-break/><text:span text:style-name="T1"> </text:span><text:span text:style-name="T2">(71/6) </text:span> ϭⲟⲙ ϭⲉ ⲙ̅ⲙⲟϥ ⲉⲉⲓ ⲉϩⲟⲩⲛ ⲙ̅ⲡ‐ <text:line-break/><text:span text:style-name="T1"> </text:span><text:span text:style-name="T2">(71/7) </text:span> ⲃⲟⲗ ⲛ̅ⲧⲉⲉⲓϣⲟⲙⲧⲉ ⲛ̅ⲥⲙⲏ ⲛ̅ⲧⲁ‐ <text:line-break/><text:span text:style-name="T1"> </text:span><text:span text:style-name="T2">(71/8) </text:span> ⲉⲓϣⲣ̅ⲡ ⲛ̅ϫⲟⲟⲩ ⲛ̅ϥⲉⲓ ⲉϩⲟⲩⲛ ϩⲓ‐ <text:line-break/><text:span text:style-name="T1"> </text:span><text:span text:style-name="T2">(71/9) </text:span> ⲧⲛ̅ ⲕⲉⲥⲙⲏ ⲛ̅ϥⲟⲩⲱⲛϩ ⲉⲃⲟⲗ ⲙⲡ‐ <text:line-break/><text:span text:style-name="T1"> </text:span><text:span text:style-name="T2">(71/10) </text:span> ⲛⲟⲩⲧⲉ ⲛ̅ⲧⲁⲗⲏⲑⲉⲓⲁ ⲛ̅ϥⲥⲩⲙⲫⲱ‐ <text:line-break/><text:span text:style-name="T1"> </text:span><text:span text:style-name="T2">(71/11) </text:span> ⲛⲓ ⲛ̅ⲟⲩⲟⲛ ⲛⲓⲙ ⲉⲧⲃⲏⲧϥ̅ ⲡⲁⲓ̈ ⲟⲩ‐ <text:line-break/><text:span text:style-name="T1"> </text:span><text:span text:style-name="T2">(71/12) </text:span> ⲁⲑⲁⲛⲁⲧⲟⲥ ⲡⲉ ⲉϥϣⲟⲟⲡ%6 ϩⲛ̅ ⲧⲙⲏ‐ <text:line-break/><text:span text:style-name="T1"> </text:span><text:span text:style-name="T2">(71/13) </text:span> ⲧⲉ ⲛ̅ⲛ̅ⲣⲱⲙⲉ ⲉϣⲁⲩⲙⲟⲩ ⲡⲉⲧ%6‐ <text:line-break/><text:span text:style-name="T1"> </text:span><text:span text:style-name="T2">(71/14) </text:span> ϣⲟⲟⲡ%6 ⲟⲩⲁⲧϣⲁϫⲉ ⲉⲣⲟϥ ⲡⲉ· ⲙ̅‐ <text:line-break/><text:span text:style-name="T1"> </text:span><text:span text:style-name="T2">(71/15) </text:span> ⲡⲉⲁⲣⲭⲏ ⲥⲟⲩⲱⲛϥ ⲙ̅ⲡⲉⲉⲝⲟⲩ‐ <text:line-break/><text:span text:style-name="T1"> </text:span><text:span text:style-name="T2">(71/16) </text:span> ⲥⲓⲁ ⲙ̅ⲡⲉϩⲩⲡⲟⲧⲁⲅⲏ ⲙ̅ⲡⲉⲫⲩⲥⲓⲥ <text:line-break/><text:span text:style-name="T1"> </text:span><text:span text:style-name="T2">(71/17) </text:span> ⲛⲓⲙ ϫⲛ̅ ⲛ̅ⲧⲕⲁⲧⲁⲃⲟⲗⲏ ⲙ̅ⲡⲕⲟⲥⲙⲟⲥ <text:line-break/><text:span text:style-name="T1"> </text:span><text:span text:style-name="T2">(71/18) </text:span> ⲉⲓⲙⲏⲧⲓ ⲛ̅ⲧⲟϥ ⲟⲩⲁⲁϥ· ⲡⲉⲧⲙ̅ⲙⲁⲩ <text:line-break/><text:span text:style-name="T1"> </text:span><text:span text:style-name="T2">(71/19) </text:span> ⲅⲁⲣ ⲟⲩⲁⲑⲁⲛⲁⲧⲟⲥ ⲡⲉ ⲟⲩϣⲁ ⲁⲛⲏ‐ <text:line-break/><text:span text:style-name="T1"> </text:span><text:span text:style-name="T2">(71/20) </text:span> ϩ̣ⲉ ⲡⲉ ⲉⲙⲛ̅ⲧⲉϥ ϫⲡⲟ ⲟⲩⲟⲛ ⲅⲁⲣ <text:line-break/><text:span text:style-name="T1"> </text:span><text:span text:style-name="T2">(71/21) </text:span> ⲛ̣ⲓⲙ ⲉⲧⲉ ⲟⲩⲛⲧⲁϥ ϫⲡⲟ ϥⲛⲁⲧⲁⲕⲟ <text:line-break/><text:span text:style-name="T1"> </text:span><text:span text:style-name="T2">(71/22) </text:span> ⲟ̣ⲩⲁⲅⲉⲛⲛⲏⲧⲟⲥ ⲡⲉ ⲉⲙⲛ̅ⲧϥ̅ ⲁⲣⲭⲏ <text:line-break/><text:span text:style-name="T1"> </text:span><text:span text:style-name="T2">(71/23) </text:span> ⲟⲩⲁ ⲛⲅⲁⲣ ⲛⲓⲙ ⲉⲧⲉ ⲟⲩⲛ̅ⲧⲁϥ ⲁⲣⲭⲏ <text:line-break/><text:soft-page-break/><text:span text:style-name="T1"> </text:span><text:span text:style-name="T2">(71/24) </text:span> ⲟⲩⲛ̅ⲧⲁϥ ϩⲁⲏ· ⲙ̅ⲙⲛ̅ ⲗⲁⲁⲩ ⲁⲣⲭⲓ ⲉ‐ <text:line-break/><text:span text:style-name="T1"> </text:span><text:span text:style-name="T2">(72/1) </text:span> ϫⲱϥ ⲙ̅ⲙⲛ̅ⲧⲁϥ ⲣⲁⲛ ⲡⲉⲧⲉ ⲟⲩⲛ̅‐ <text:line-break/><text:span text:style-name="T1"> </text:span><text:span text:style-name="T2">(72/2) </text:span> ⲧϥ̅ ⲣⲁⲛ ⲅⲁⲣ ⲡⲥⲱⲛⲧ%6 ⲛ̅ⲕⲉⲟⲩⲁ <text:line-break/><text:span text:style-name="T1"> </text:span><text:span text:style-name="T2">(72/3) </text:span> ⲡⲉ ⲟⲩⲁⲧ%6ϯ ⲣⲁⲛ ⲉⲣⲟϥ ⲡⲉ ⲙⲛ̅ⲧⲁϥ <text:line-break/><text:span text:style-name="T1"> </text:span><text:span text:style-name="T2">(72/4) </text:span> ⲙⲟⲣⲫⲏ ⲛ̅ⲣⲱⲙⲉ ⲡⲉⲧⲉ ⲟⲩⲛⲧϥ̅ <text:line-break/><text:span text:style-name="T1"> </text:span><text:span text:style-name="T2">(72/5) </text:span> ⲙⲟⲣⲫⲏ ⲅⲁⲣ ⲛ̅ⲣⲱⲙⲉ ⲡⲥⲱⲛⲧ%6 <text:line-break/><text:span text:style-name="T1"> </text:span><text:span text:style-name="T2">(72/6) </text:span> ⲛ̅ⲕⲉⲟⲩⲁ ⲡⲉ ⲟⲩⲛ̅ⲧⲁϥ· ⲛ̅ⲛⲟⲩϩⲓ‐ <text:line-break/><text:span text:style-name="T1"> </text:span><text:span text:style-name="T2">(72/7) </text:span> ⲇⲉⲁ ⲙ̅ⲙⲓⲛ ⲙ̅ⲙⲟϥ ⲛ̅ⲑⲉ ⲁⲛ ⲛ̅‐ <text:line-break/><text:span text:style-name="T1"> </text:span><text:span text:style-name="T2">(72/8) </text:span> ⲧϩⲓⲇⲉⲁ ⲛ̅ⲧⲁⲛϫⲓⲧⲥ̅ ⲏ̅ ⲛ̅ⲧⲁⲛⲛⲁⲩ <text:line-break/><text:span text:style-name="T1"> </text:span><text:span text:style-name="T2">(72/9) </text:span> ⲉⲣⲟⲥ ⲁⲗⲗⲁ ⲟⲩϩⲓⲇⲉⲁ ⲛ̅ϣⲙ̅ⲙⲱ <text:line-break/><text:span text:style-name="T1"> </text:span><text:span text:style-name="T2">(72/10) </text:span> ⲧⲉ ⲉⲥⲟⲩⲁⲧⲃ̅ ⲛ̅ϩⲟⲩⲟ ⲉⲛⲕⲁ ⲛⲓⲙ <text:line-break/><text:span text:style-name="T1"> </text:span><text:span text:style-name="T2">(72/11) </text:span> ⲉⲥⲥⲁⲧⲡ%6 ⲉⲛⲓⲡⲧⲏⲣϥ̅· ⲉⲥⲛⲁⲩ <text:line-break/><text:span text:style-name="T1"> </text:span><text:span text:style-name="T2">(72/12) </text:span> ϩⲓ ⲥ→ⲁ← ⲛⲓⲙ ⲉⲥⲉⲓ̈ⲱⲣϩ ⲙ̅ⲙⲟⲥ <text:line-break/><text:span text:style-name="T1"> </text:span><text:span text:style-name="T2">(72/13) </text:span> ⲟⲩⲁⲁⲥ%6 ϩⲓⲧⲟⲟⲧⲥ̅ ⲙⲙⲓⲛ ⲙ̅ⲙⲟⲥ <text:line-break/><text:span text:style-name="T1"> </text:span><text:span text:style-name="T2">(72/14) </text:span> ⲟⲩⲁⲧⲁⲣ→ⲏ←ϫϥ̅ ⲡⲉ ⲟⲩⲁⲧ%6ⲧⲁϩⲟϥ ⲡⲉ <text:line-break/><text:span text:style-name="T1"> </text:span><text:span text:style-name="T2">(72/15) </text:span> ⲟⲩⲁ ⲉϥⲙⲏⲛ ⲉⲃⲟⲗ ⲡⲉ ⲛ̅ⲁⲫⲑⲁⲣ‐ <text:line-break/><text:span text:style-name="T1"> </text:span><text:span text:style-name="T2">(72/16) </text:span> ⲧⲟⲥ· ⲟⲩⲁ ⲉⲙ̅ⲛⲧⲁϥ ⲡⲉϥⲉⲓⲛⲉ ⲡⲉ <text:line-break/><text:span text:style-name="T1"> </text:span><text:span text:style-name="T2">(72/17) </text:span> ⲟⲩⲁⲅⲁⲑⲟⲥ ⲡⲉ ⲛ̅ⲁⲧ%6ϣⲓⲃⲉ ⲟⲩⲁⲧ%6‐ <text:line-break/><text:span text:style-name="T1"> </text:span><text:span text:style-name="T2">(72/18) </text:span> ϣⲱⲱⲧ%6 ⲡⲉ ⲟⲩⲁ ⲉϥⲙⲏⲛ ⲉⲃⲟⲗ <text:line-break/><text:span text:style-name="T1"> </text:span><text:span text:style-name="T2">(72/19) </text:span> ⲡⲉ ⲟⲩⲙⲁⲕⲁⲣⲓⲟⲥ ⲡⲉ ⲟⲩⲁⲧⲛⲟ‐ <text:line-break/><text:span text:style-name="T1"> </text:span><text:span text:style-name="T2">(72/20) </text:span> ⲉⲓ ⲙ̅ⲙⲟϥ ⲡⲉ ⲉϣⲁϥⲛⲟⲉⲓ ⲙ̅‐ <text:line-break/><text:span text:style-name="T1"> </text:span><text:span text:style-name="T2">(72/21) </text:span> ⲙⲟϥ ⲙ̅ⲙⲓⲛ ⲙ̅ⲙⲟϥ· ⲟⲩⲁⲧϣⲓ̣‐ <text:line-break/><text:span text:style-name="T1"> </text:span><text:span text:style-name="T2">(72/22) </text:span> ⲧϥ̅ ⲡⲉ%6 ⲟⲩⲁⲧ%6ϫⲓ ϭⲉϫⲙ̅ ⲛ̅ⲥⲱϥ ⲡⲉ <text:line-break/><text:span text:style-name="T1"> </text:span><text:span text:style-name="T2">(72/23) </text:span> ⲟⲩⲧⲉⲗⲉⲓⲟⲥ ⲡⲉ ⲉⲙⲛ̅ⲧⲉϥ ϣⲱ’‐ <text:line-break/><text:span text:style-name="T1"> </text:span><text:span text:style-name="T2">(73/1) </text:span> ⲱⲧ%6 ⲟⲩⲙⲁⲕ[ⲁ]ⲣ̣ⲓⲟⲥ ⲡⲉ ⲛ̅ⲁⲫⲑⲁⲣ‐ <text:line-break/><text:span text:style-name="T1"> </text:span><text:span text:style-name="T2">(73/2) </text:span> ⲧⲟⲥ ϣⲁⲩⲭⲟⲟⲥ ⲉⲣⲟϥ ϫⲉ ⲡⲓⲱⲧ%6 <text:line-break/><text:span text:style-name="T1"> </text:span><text:span text:style-name="T2">(73/3) </text:span> ⲙ̅ⲡⲧⲏⲣϥ· ϩⲁⲑⲏ ⲉⲙⲡⲁⲧⲉⲗⲁⲁⲩ <text:line-break/><text:span text:style-name="T1"> </text:span><text:span text:style-name="T2">(73/4) </text:span> ⲟⲩⲱⲛϩ ϩⲛ̅ ⲛ̅ⲉⲧⲟⲩⲁⲛϩ ⲉⲃⲟⲗ· <text:line-break/><text:span text:style-name="T1"> </text:span><text:span text:style-name="T2">(73/5) </text:span> ϯⲙⲛ̅ⲧⲛⲟϭ ⲙⲛ̅ ⲛⲓⲉⲝⲟⲩⲥⲓⲁ ⲉ‐ <text:line-break/><text:span text:style-name="T1"> </text:span><text:span text:style-name="T2">(73/6) </text:span> ⲧϣⲟⲟⲡ%6 ⲛ̅ϩⲏⲧϥ̅ ⲉϥⲁⲙⲁϩⲧⲉ ⲛ̅ⲛⲓ‐ <text:line-break/><text:span text:style-name="T1"> </text:span><text:span text:style-name="T2">(73/7) </text:span> ⲡⲧⲏⲣϥ̅· ⲛ̅ⲧⲉ ⲛⲓⲡⲧⲏⲣϥ̅· ⲁⲩⲱ ⲙ̅‐ <text:line-break/><text:span text:style-name="T1"> </text:span><text:span text:style-name="T2">(73/8) </text:span> ⲙⲛ̅ ⲗⲁⲁⲩ ⲁⲙⲁϩⲧⲉ ⲙ̅ⲙⲟϥ· ⲡⲉⲧⲙ̅‐ <text:line-break/><text:span text:style-name="T1"> </text:span><text:span text:style-name="T2">(73/9) </text:span> ⲙⲁⲩ ⲅⲁⲣ· ⲟⲩⲛⲟⲩⲥ ⲧⲏⲣϥ̅· ⲟⲩⲉⲛⲛⲟⲓⲁ <text:line-break/><text:span text:style-name="T1"> </text:span><text:span text:style-name="T2">(73/10) </text:span> ⲙⲛ̅ ⲟⲩⲉⲛⲑⲩⲙⲏⲥⲓⲥ ⲟ〈ⲩ〉ⲫⲣⲟⲛⲏⲥⲓⲥ <text:line-break/><text:span text:style-name="T1"> </text:span><text:span text:style-name="T2">(73/11) </text:span> ⲟⲩⲗⲟⲅⲓⲥⲙⲟⲥ ⲙⲛ̅ ⲟⲩⲇⲩⲛⲁⲙⲓⲥ <text:line-break/><text:span text:style-name="T1"> </text:span><text:span text:style-name="T2">(73/12) </text:span> ⲛ̅ⲧⲟⲟⲩ ⲧⲏⲣⲟⲩ ϩⲉⲛϩⲓⲥⲟⲇⲩⲛⲁ‐ <text:line-break/><text:span text:style-name="T1"> </text:span><text:span text:style-name="T2">(73/13) </text:span> ⲙⲓⲥ ⲛⲉ ⲙ̅ⲡⲏⲅⲏ ⲛ̅ⲛⲓⲡⲧⲏⲣϥ ⲛⲉ <text:line-break/><text:span text:style-name="T1"> </text:span><text:span text:style-name="T2">(73/14) </text:span> ⲁⲩⲱ ⲡⲉⲩⲅⲉⲛⲟⲥ ⲧⲏⲣϥ̅ 〈ϫⲓⲛ ⲛ̅ϣⲟⲣⲡ%6〉 ϣⲁ ⲁⲣⲏ‐ <text:line-break/><text:span text:style-name="T1"> </text:span><text:span text:style-name="T2">(73/15) </text:span> ϫⲛⲟⲩ ⲉⲩϣⲟⲟⲡ%6 ϩⲙ̅ ⲡⲉϩⲟⲩⲉⲓⲧ%6 <text:line-break/><text:span text:style-name="T1"> </text:span><text:span text:style-name="T2">(73/16) </text:span> ⲛ̅ⲥⲟⲟⲩⲛ ⲙ̅ⲡⲁⲅⲉⲛⲛⲏⲧⲟⲥ· ⲛⲉ‐ <text:line-break/><text:span text:style-name="T1"> </text:span><text:span text:style-name="T2">(73/17) </text:span> ⲙ̅ⲡⲁⲧⲟⲩⲉⲓ ⲅⲁⲣ ⲉⲡⲉⲧⲟⲩⲁⲛϩ <text:line-break/><text:span text:style-name="T1"> </text:span><text:span text:style-name="T2">(73/18) </text:span> ⲛ̣ⲉⲟⲩⲛ ⲟⲩⲇⲓⲁⲫⲟⲣⲁ ⲇⲉ ϣⲟⲟⲡ· <text:line-break/><text:span text:style-name="T1"> </text:span><text:span text:style-name="T2">(73/19) </text:span> [ⲟ]ⲩⲧⲉ ⲛⲓⲁⲫⲑⲁⲣⲧⲟⲥ ⲛ̅ⲁⲓⲱⲛ <text:line-break/><text:span text:style-name="T1"> </text:span><text:span text:style-name="T2">(73/20) </text:span> ⲙ̣ⲁⲣⲉⲛⲛⲟⲉⲓ ϭⲉ ⲛ̅ⲧⲉⲉⲓϩⲉ ϫⲉ <text:line-break/><text:span text:style-name="T1"> </text:span><text:span text:style-name="T2">(73/21) </text:span> ⲛ̣̅ⲕⲁ ⲛⲓⲙ ⲛ̅ⲧⲁⲩϣⲱⲡⲉ ⲉⲃⲟⲗ ϩⲙ̅ <text:line-break/><text:span text:style-name="T1"> </text:span><text:span text:style-name="T2">(73/22) </text:span> ⲡ̣ⲧⲁⲕⲟ ⲥⲉⲛⲁⲧⲁⲕⲟ ϩⲱⲥ ⲉⲁⲩϣⲱ‐ <text:line-break/><text:span text:style-name="T1"> </text:span><text:span text:style-name="T2">(73/23) </text:span> ⲡ̣ⲉ ⲉⲃⲟⲗ ϩⲙ̅ ⲡⲧ%6ⲁⲕⲟ· ⲡⲉⲛⲧⲁϥϣⲱ‐ <text:line-break/><text:soft-page-break/><text:span text:style-name="T1"> </text:span><text:span text:style-name="T2">(74/1) </text:span> ⲡⲉ ⲉⲃⲟⲗ ϩⲛ̅ ⲧⲁⲫⲑ̣ⲁ̣ⲣⲥⲓⲁ ⲛϥⲛⲁ‐ <text:line-break/><text:span text:style-name="T1"> </text:span><text:span text:style-name="T2">(74/2) </text:span> ⲧⲁⲕⲟ ⲁⲛ ⲁⲗⲗⲁ ⲉϥⲛⲁϣⲱⲡⲉ ⲛ̅‐ <text:line-break/><text:span text:style-name="T1"> </text:span><text:span text:style-name="T2">(74/3) </text:span> ⲁⲫⲑⲁⲣⲧⲟⲥ ϩⲱⲥ ⲉⲁϥϣⲱⲡⲉ ⲉ‐ <text:line-break/><text:span text:style-name="T1"> </text:span><text:span text:style-name="T2">(74/4) </text:span> ⲃⲟⲗ ϩⲛ̅ ⲧⲁⲫⲑⲁⲣⲥⲓⲁ· ϩⲱⲥⲧⲉ ⲟⲩ‐ <text:line-break/><text:span text:style-name="T1"> </text:span><text:span text:style-name="T2">(74/5) </text:span> ⲙⲏⲏϣⲉ ⲛ̅ⲣⲱⲙⲉ ⲁⲩⲡⲗⲁⲛⲁ <text:line-break/><text:span text:style-name="T1"> </text:span><text:span text:style-name="T2">(74/6) </text:span> ⲙ̅ⲡⲟⲩⲥⲟⲩⲛ̅ ⲧⲉⲉⲓⲇⲓⲁⲫⲟⲣⲁ ⲉⲧⲉ <text:line-break/><text:span text:style-name="T1"> </text:span><text:span text:style-name="T2">(74/7) </text:span> ⲧⲁⲓ̈ ⲧⲉ ⲁⲩⲙⲟⲩ· ⲁⲩⲱ ϩⲱ͂ ϣⲁ <text:line-break/><text:span text:style-name="T1"> </text:span><text:span text:style-name="T2">(74/8) </text:span> ⲡⲉⲉⲓⲙⲁ· ⲉⲡⲓ ⲙⲛ̅ ϣϭⲟⲙ ⲛ̅ⲗⲁⲁⲩ <text:line-break/><text:span text:style-name="T1"> </text:span><text:span text:style-name="T2">(74/9) </text:span> ⲉϯ ⲟⲩⲃⲉ ⲧⲉⲫⲩⲥⲓⲥ ⲛ̅ⲛ̅ϣⲁϫⲉ <text:line-break/><text:span text:style-name="T1"> </text:span><text:span text:style-name="T2">(74/10) </text:span> ⲛ̅ⲧⲁⲉⲓⲣ̅ ϣⲣ̅ⲡ%6 ⲛ̅ϫⲟⲟⲩ{ⲉ} ⲙ̅ⲡⲙⲁ‐ <text:line-break/><text:span text:style-name="T1"> </text:span><text:span text:style-name="T2">(74/11) </text:span> ⲕⲁⲣⲓⲟⲥ ⲛ̅ⲁⲫⲑⲁⲣⲧⲟⲥ ⲛ̅ⲛⲟⲩⲧⲉ <text:line-break/><text:span text:style-name="T1"> </text:span><text:span text:style-name="T2">(74/12) </text:span> ⲙ̅ⲙⲏⲉ· ⲉϣⲱⲡⲉ ϭⲉ ⲉⲩⲛ̅ ⲟⲩⲁ <text:line-break/><text:span text:style-name="T1"> </text:span><text:span text:style-name="T2">(74/13) </text:span> ⲉϥⲟⲩⲉϣ ⲡⲓⲥⲧⲉⲩⲉ ⲉⲛϣⲁϫⲉ <text:line-break/><text:span text:style-name="T1"> </text:span><text:span text:style-name="T2">(74/14) </text:span> ⲉⲧⲕⲏ ⲉϩⲣⲁⲓ̈ ⲙⲁⲣⲉϥⲙⲟⲩϣⲧ%6 <text:line-break/><text:span text:style-name="T1"> </text:span><text:span text:style-name="T2">(74/15) </text:span> ϫⲛ̅ ⲙ̅ⲡⲉⲑⲏⲡ%6 ϣⲁ ⲡϫⲱⲕ ⲙ̅ⲡⲉ‐ <text:line-break/><text:span text:style-name="T1"> </text:span><text:span text:style-name="T2">(74/16) </text:span> ⲧⲟⲩⲁⲛϩ ⲉⲃⲟⲗ ⲁⲩⲱ ⲧⲉⲉⲓⲉⲛⲛⲟⲓ <text:line-break/><text:span text:style-name="T1"> </text:span><text:span text:style-name="T2">(74/17) </text:span> ⲁ· ⲛⲁⲧⲥⲁⲃⲟϥ ϫⲉ ⲡⲱⲥ ⲧⲡⲓⲥⲧⲓⲥ <text:line-break/><text:span text:style-name="T1"> </text:span><text:span text:style-name="T2">(74/18) </text:span> ⲛ̅ⲛⲉⲧⲉ ⲛ̅ⲥⲉⲟⲩⲟⲛϩ ⲉⲃⲟⲗ ⲁⲛ· ⲁⲩ‐ <text:line-break/><text:span text:style-name="T1"> </text:span><text:span text:style-name="T2">(74/19) </text:span> ϭⲛⲧⲥ̅ ϩⲙ̅ ⲡⲉⲧⲟⲩⲁⲛϩ ⲉⲃⲟⲗ· ⲟⲩ‐ <text:line-break/><text:span text:style-name="T1"> </text:span><text:span text:style-name="T2">(74/20) </text:span> ⲁⲣⲭⲏ ⲛ̅ⲥⲟⲟⲩⲛ ⲧⲉ ⲧⲁⲓ̈· ⲡϫⲟⲉⲓ̈ⲥ <text:line-break/><text:span text:style-name="T1"> </text:span><text:span text:style-name="T2">(74/21) </text:span> ⲙ̅ⲡⲧⲏⲣϥ ⲕⲁⲧⲁ ⲧⲁⲗⲏⲑⲉⲓⲁ ⲙ[ⲉⲩ]‐ <text:line-break/><text:span text:style-name="T1"> </text:span><text:span text:style-name="T2">(74/22) </text:span> ϫⲟⲟⲥ ⲉⲣⲟϥ ϫⲉ ⲉⲓⲱⲧ%6 ⲁⲗⲗⲁ ⲡⲣ̣[ⲟ]‐ <text:line-break/><text:span text:style-name="T1"> </text:span><text:span text:style-name="T2">(74/23) </text:span> ⲡⲁⲧⲱⲣ ⲡⲉⲓⲱⲧ%6 ⲅⲁⲣ ⲧⲁⲣⲭⲏ ⲙ̣̅‐ <text:line-break/><text:span text:style-name="T1"> </text:span><text:span text:style-name="T2">(75/1) </text:span> ⲡⲉⲧⲟⲩⲁⲛϩ [ⲉⲃⲟⲗ] ⲡ̣ⲉ· ⲡⲉⲧⲙ̅‐ <text:line-break/><text:span text:style-name="T1"> </text:span><text:span text:style-name="T2">(75/2) </text:span> ⲙⲁⲩ ⲅⲁⲣ ⲡⲁ̣ⲛ̣[ⲁ]ⲣ̣ⲭ̣ⲟⲥ ⲙ̅ⲡⲣⲟ‐ <text:line-break/><text:span text:style-name="T1"> </text:span><text:span text:style-name="T2">(75/3) </text:span> ⲡⲁⲧⲱⲣ̣ ⲉϥⲛⲁⲩ ⲉⲣⲟϥ ⲙ̅ⲙⲓⲛ <text:line-break/><text:span text:style-name="T1"> </text:span><text:span text:style-name="T2">(75/4) </text:span> ⲙ̅ⲙⲟϥ ⲛ̅ϩⲣⲁⲓ̈ ⲛ̅ϩⲏⲧϥ̅· ⲛ̅ⲑⲉ ⲛ̅ⲟⲩ‐ <text:line-break/><text:span text:style-name="T1"> </text:span><text:span text:style-name="T2">(75/5) </text:span> ⲉⲓⲁⲗ· ⲉⲁϥⲟⲩⲱⲛϩ ⲉⲃⲟⲗ ϩⲙ̅ ⲡⲉϥ‐ <text:line-break/><text:span text:style-name="T1"> </text:span><text:span text:style-name="T2">(75/6) </text:span> ⲉⲓⲛⲉ ⲛ̅ⲁⲩⲧⲟⲡⲁⲧⲱⲣ ⲉⲧⲉ ⲡⲁⲓ̈ <text:line-break/><text:span text:style-name="T1"> </text:span><text:span text:style-name="T2">(75/7) </text:span> ⲡⲉ ⲡⲁⲩⲧⲟⲅⲉⲛⲉⲧⲱⲣ· ⲁⲩⲱ ⲛⲁⲛ‐ <text:line-break/><text:span text:style-name="T1"> </text:span><text:span text:style-name="T2">(75/8) </text:span> ⲧⲟⲡⲟⲥ ⲉⲡⲓ ⲁⲛⲧⲟⲡⲓⲧⲱ ⲙ̅ⲡⲣⲟ‐ <text:line-break/><text:span text:style-name="T1"> </text:span><text:span text:style-name="T2">(75/9) </text:span> ⲟⲛⲧⲟⲥ ⲛ̅ⲁⲅⲉⲛⲛⲏⲧⲟⲥ· ⲟⲩϩⲓ‐ <text:line-break/><text:span text:style-name="T1"> </text:span><text:span text:style-name="T2">(75/10) </text:span> ⲥⲟⲭⲣⲟⲛⲟⲥ ⲙⲉⲛ ⲡⲉ ⲙ̅ⲡⲉⲧϩⲁ‐ <text:line-break/><text:span text:style-name="T1"> </text:span><text:span text:style-name="T2">(75/11) </text:span> ⲧⲉϥϩⲏ· ⲁⲗⲗⲁ ⲛ̅ϥϣⲏϣ ⲟⲩⲃⲏϥ <text:line-break/><text:span text:style-name="T1"> </text:span><text:span text:style-name="T2">(75/12) </text:span> ⲁⲛ ϩⲛ̅ ⲧϭⲟⲙ· ⲙⲛ̅ⲛ̅ⲥⲱϥ ⲁϥⲟⲩ‐ <text:line-break/><text:span text:style-name="T1"> </text:span><text:span text:style-name="T2">(75/13) </text:span> ⲱⲛϩ ⲉⲃⲟⲗ ⲛ̅ⲟⲩⲙⲏⲏϣⲉ ⲛ̅ⲁⲛ‐ <text:line-break/><text:span text:style-name="T1"> </text:span><text:span text:style-name="T2">(75/14) </text:span> ⲧⲟⲡⲟⲥ ⲛ̅ⲁⲩⲧⲟⲅⲉⲛⲏⲥ ⲛ̅ϩⲓⲥⲟ‐ <text:line-break/><text:span text:style-name="T1"> </text:span><text:span text:style-name="T2">(75/15) </text:span> ⲭⲣⲟⲛⲟⲥ ⲛ̅ϩⲓⲥⲟⲇⲩⲛⲁⲙⲓⲥ ⲉⲩ‐ <text:line-break/><text:span text:style-name="T1"> </text:span><text:span text:style-name="T2">(75/16) </text:span> ϩⲁ ⲉⲟⲟⲩ ⲉⲙⲛ̅ⲧⲟⲩ ⲏⲡⲉ· ⲉϣⲁⲩ‐ <text:line-break/><text:span text:style-name="T1"> </text:span><text:span text:style-name="T2">(75/17) </text:span> ⲙⲟⲩⲧⲉ ⲉⲣⲟⲟⲩ ϫⲉ ⲧⲅⲉⲛⲉⲁ ⲉ‐ <text:line-break/><text:span text:style-name="T1"> </text:span><text:span text:style-name="T2">(75/18) </text:span> ⲧⲉ ⲙⲛ̅ ⲙⲛ̅ⲧⲣ̅ⲣⲟ ϩⲓϫⲱⲥ ⲛ̅ϩⲣⲁⲓ̈ <text:line-break/><text:span text:style-name="T1"> </text:span><text:span text:style-name="T2">(75/19) </text:span> ϩⲛ̅ ⲙ̅ⲙⲛ̅ⲧⲣ̅ⲣⲁⲓ̈ ⲉⲧⲕⲏ ⲉϩⲣⲁⲓ̈ ⲡⲙⲏ‐ <text:line-break/><text:span text:style-name="T1"> </text:span><text:span text:style-name="T2">(75/20) </text:span> ⲏϣⲉ ⲇⲉ ⲧⲏⲣ̅ϥ̅ ⲙ̅ⲡⲙⲁ ⲉⲧⲉ ⲙⲛ̅ <text:line-break/><text:span text:style-name="T1"> </text:span><text:span text:style-name="T2">(75/21) </text:span> ⲙⲛ̅ⲧⲣⲣⲟ ϩⲓϫⲱϥ ϣⲁⲩϫⲟⲟⲥ ⲉ‐ <text:line-break/><text:span text:style-name="T1"> </text:span><text:span text:style-name="T2">(75/22) </text:span> ⲣⲟⲟⲩ ϫⲉ ⲛ̅ϣⲏⲣⲉ ⲛ̅ⲡⲁⲅⲉⲛⲛⲏ‐ <text:line-break/><text:span text:style-name="T1"> </text:span><text:span text:style-name="T2">(75/23) </text:span> ⲧⲟⲥ ⲛ̅ⲉⲓⲱⲧ%6 ⲛ̅ⲧⲟϥ ⲇⲉ ⲡⲓⲁⲧⲛⲟⲉⲓ <text:line-break/><text:span text:style-name="T1"> </text:span><text:span text:style-name="T2">(76/1) </text:span> ⲙ̅ⲙⲟϥ ⲉϥ[ⲙⲏϩ ⲉ]ⲃⲟⲗ ⲛ̅ⲛⲁⲩ ⲛⲓⲙ <text:line-break/><text:soft-page-break/><text:span text:style-name="T1"> </text:span><text:span text:style-name="T2">(76/2) </text:span> ⲛ̅ⲁⲫⲑⲁⲣⲥ̣ⲓ̣ⲁ̣ [ⲙⲛ̅ ⲟ]ⲩⲣⲁϣⲉ ⲛ̅ⲁⲧϣⲁ‐ <text:line-break/><text:span text:style-name="T1"> </text:span><text:span text:style-name="T2">(76/3) </text:span> ϫⲉ ⲉⲣⲟϥ ⲛ̅ⲧⲟⲟⲩ ⲧⲏⲣⲟⲩ̣ ⲉⲩⲙ̅ⲧⲟⲛ <text:line-break/><text:span text:style-name="T1"> </text:span><text:span text:style-name="T2">(76/4) </text:span> ⲙ̅ⲙⲟⲟⲩ ⲛ̅ϩⲏⲧϥ̅· ⲉⲩⲙⲏ̣ⲛ ⲉⲃⲟⲗ <text:line-break/><text:span text:style-name="T1"> </text:span><text:span text:style-name="T2">(76/5) </text:span> ⲉⲩⲣⲁϣⲉ ϩⲛ̅ ⲟⲩⲣⲁϣⲉ ⲛ̅ⲁⲧ%6{ⲧ}ϣⲁϫⲉ <text:line-break/><text:span text:style-name="T1"> </text:span><text:span text:style-name="T2">(76/6) </text:span> ⲉⲣⲟϥ ⲉϩⲣⲁⲓ̈ ⲉϫⲙ̅ ⲡⲉⲟⲟⲩ ⲉⲧⲉ ⲙⲉϥ‐ <text:line-break/><text:span text:style-name="T1"> </text:span><text:span text:style-name="T2">(76/7) </text:span> ϣⲓⲃⲉ ⲙⲛ̅ ⲡⲧⲉⲗⲏⲗ ⲉⲧⲉ ⲙⲉⲩϣⲓⲧϥ̅· <text:line-break/><text:span text:style-name="T1"> </text:span><text:span text:style-name="T2">(76/8) </text:span> ⲡⲁⲓ̈ ⲉⲧⲉ ⲙ̅ⲡⲟⲩⲥⲟⲧⲙⲉϥ ⲉⲛⲉϩ ⲟⲩ‐ <text:line-break/><text:span text:style-name="T1"> </text:span><text:span text:style-name="T2">(76/9) </text:span> ⲇⲉ ⲙ̅ⲡⲟⲩⲛⲟⲉⲓ ⲙ̅ⲙⲟϥ ϩⲛ̅ ⲛⲁⲓⲱⲛ <text:line-break/><text:span text:style-name="T1"> </text:span><text:span text:style-name="T2">(76/10) </text:span> ⲧⲏⲣⲟⲩ ⲙⲛ̅ ⲛⲉⲩⲕⲟⲥⲙⲟⲥ· ⲁⲩⲱ <text:line-break/><text:span text:style-name="T1"> </text:span><text:span text:style-name="T2">(76/11) </text:span> ϩⲱ͂ ϣⲁ ⲡⲉⲉⲓⲙⲁ ϫⲉⲕⲁⲁⲥ ⲛ̅ⲛⲉⲛ‐ <text:line-break/><text:span text:style-name="T1"> </text:span><text:span text:style-name="T2">(76/12) </text:span> ⲃⲱⲕ ⲉⲃⲟⲗ ϩⲙ̅ ⲡⲓⲁⲡⲓⲣⲟⲛ· <text:line-break/><text:span text:style-name="T1"> </text:span><text:span text:style-name="T2">(76/13) </text:span> ⲕⲉⲁⲣⲭⲏ ⲛ̅ⲥⲟⲟⲩⲛ ⲧⲉ ⲧⲁⲓ̈· ⲉⲃⲟⲗ ϩⲓ‐ <text:line-break/><text:span text:style-name="T1"> </text:span><text:span text:style-name="T2">(76/14) </text:span> ⲧⲟⲟⲧϥ̅ ⲙ̅ⲡ〈ⲁⲩⲧⲟ〉ⲅⲉⲛⲛⲏⲧⲟⲥ ⲡⲉϩⲟⲩⲉⲓⲧ%6 <text:line-break/><text:span text:style-name="T1"> </text:span><text:span text:style-name="T2">(76/15) </text:span> ⲛ̅ⲧⲁϥⲟⲩⲱⲛϩ ϩⲁⲑⲏ ⲙ̅ⲡⲧⲏⲣϥ· <text:line-break/><text:span text:style-name="T1"> </text:span><text:span text:style-name="T2">(76/16) </text:span> ϩⲙ̅ ⲡⲁⲡⲉⲣⲁⲛⲧⲟⲛ ⲟⲩⲁⲩⲧⲟⲫⲩ‐ <text:line-break/><text:span text:style-name="T1"> </text:span><text:span text:style-name="T2">(76/17) </text:span> ⲏⲥ ⲡⲉ ⲛ̅ⲁⲩⲧⲟⲕⲧⲓⲥⲧⲟⲥ ⲛ̅ⲉⲓⲱⲧ%6 <text:line-break/><text:span text:style-name="T1"> </text:span><text:span text:style-name="T2">(76/18) </text:span> ⲉϥϫⲏⲕ ⲉⲃⲟⲗ ϩⲙ̅ ⲡⲟⲩⲟⲉⲓⲛ ⲉⲧⲣ̅ⲟⲩ‐ <text:line-break/><text:span text:style-name="T1"> </text:span><text:span text:style-name="T2">(76/19) </text:span> ⲟⲉⲓⲛ ⲛ̅ⲁⲧϣⲁϫⲉ ⲉⲣⲟϥ ⲡⲁⲓ̈ ⲁϥⲛⲟ‐ <text:line-break/><text:span text:style-name="T1"> </text:span><text:span text:style-name="T2">(76/20) </text:span> ⲉⲓ ⲛ̅ⲧⲁⲣⲭⲏ ⲉⲧⲣⲉⲡⲉϥⲉⲓⲛⲉ ϣⲱ‐ <text:line-break/><text:span text:style-name="T1"> </text:span><text:span text:style-name="T2">(76/21) </text:span> ⲡⲉ ⲛ̅ⲟⲩⲛⲟϭ ⲛ̅ϭⲟⲙ· ⲛ̅ⲧⲉⲩⲛⲟⲩ <text:line-break/><text:span text:style-name="T1"> </text:span><text:span text:style-name="T2">(76/22) </text:span> ⲁⲧⲁⲣⲭⲏ ⲙ̅ⲡⲟⲩⲟⲉⲓⲛ ⲉⲧⲙ̅ⲙⲁⲩ <text:line-break/><text:span text:style-name="T1"> </text:span><text:span text:style-name="T2">(76/23) </text:span> ⲟⲩⲱⲛϩ ⲉⲃⲟⲗ ⲛ̅ⲟⲩⲣⲱⲙⲉ ⲛ̅ⲁⲑⲁ‐ <text:line-break/><text:span text:style-name="T1"> </text:span><text:span text:style-name="T2">(76/24) </text:span> ⲛⲁⲧⲟⲥ ⲛ̅ϩⲟⲟⲩⲧ%6ⲥϩⲓⲙⲉ· ⲡⲉϥⲣⲁⲛ <text:line-break/><text:span text:style-name="T1"> </text:span><text:span text:style-name="T2">(77/1) </text:span> ⲙ̅ⲙⲛ̅ⲧϩ[ⲟⲟⲩⲧ%6 ϣⲁⲩϫⲟ]ⲟⲥ ⲉⲣⲟϥ <text:line-break/><text:span text:style-name="T1"> </text:span><text:span text:style-name="T2">(77/2) </text:span> ϫⲉ ⲡⲉϫ̣[ⲡⲟ ⲡⲛⲟⲩⲥ ⲉⲧ]ϫ̣ⲏⲕ ⲉⲃⲟⲗ· <text:line-break/><text:span text:style-name="T1"> </text:span><text:span text:style-name="T2">(77/3) </text:span> ⲡⲉϥⲣⲁⲛ̣ [ⲇⲉ ⲙ̅ⲙⲛ̅]ⲧⲥ̅ϩⲓⲙⲉ ⲡⲁⲛⲥⲟ‐ <text:line-break/><text:span text:style-name="T1"> </text:span><text:span text:style-name="T2">(77/4) </text:span> ⲫⲟⲥ ⲥⲟⲫⲓ̣ⲁ ⲛ̅ⲅⲉ̣ⲛⲉⲧⲉⲓⲣⲁ· ⲥⲉϫⲱ <text:line-break/><text:span text:style-name="T1"> </text:span><text:span text:style-name="T2">(77/5) </text:span> ⲙ̅ⲙⲟⲥ ⲉⲣⲟⲥ ⲟⲛ ϫⲉ ⲉⲥⲉⲓⲛⲉ ⲙ̅ⲡⲉⲥ‐ <text:line-break/><text:span text:style-name="T1"> </text:span><text:span text:style-name="T2">(77/6) </text:span> ⲥⲟⲛ ⲁⲩⲱ ⲡⲉⲥⲥⲩⲛⲍⲩⲅⲟⲥ· ⲟⲩ‐ <text:line-break/><text:span text:style-name="T1"> </text:span><text:span text:style-name="T2">(77/7) </text:span> ⲙⲏⲉ ⲉ{ⲩ}ⲙⲉⲩϯ ⲛ̅ⲙⲙⲁⲥ ⲧⲉ· ⲧⲙⲏ‐ <text:line-break/><text:span text:style-name="T1"> </text:span><text:span text:style-name="T2">(77/8) </text:span> ⲉ ⲅⲁⲣ ⲙ̅ⲡⲉⲥⲏⲧ%6 ϣⲁⲥϯ ⲛⲙ̅ⲙⲁⲥ <text:line-break/><text:span text:style-name="T1"> </text:span><text:span text:style-name="T2">(77/9) </text:span> ⲛ̅ϭⲓ ⲧⲉⲡⲗⲁⲛⲏ ⲉⲧⲛ̅ⲙⲙⲁⲥ ⲉⲃⲟⲗ <text:line-break/><text:span text:style-name="T1"> </text:span><text:span text:style-name="T2">(77/10) </text:span> ϩⲓⲧⲟⲟⲧϥ̅ ⲙ̅ⲡⲁⲑⲁⲛⲁⲧⲟⲥ ⲛ̅ⲣⲱⲙⲉ <text:line-break/><text:span text:style-name="T1"> </text:span><text:span text:style-name="T2">(77/11) </text:span> ⲁⲥⲟⲩⲱⲛϩ ⲉⲃⲟⲗ ⲛ̅ϭⲓ ⲟⲩⲟⲛⲟⲙⲁ‐ <text:line-break/><text:span text:style-name="T1"> </text:span><text:span text:style-name="T2">(77/12) </text:span> ⲥⲓⲁ ⲛ̅ϣⲟⲣⲡ%6 ϫⲉ ⲙⲛ̅ⲧⲛⲟⲩⲧⲉ <text:line-break/><text:span text:style-name="T1"> </text:span><text:span text:style-name="T2">(77/13) </text:span> ϩⲓ ⲙⲛ̅ⲧⲣ̅ⲣⲟ· ⲡⲓⲱⲧ%6 ⲅⲁⲣ ⲉϣⲁⲩ‐ <text:line-break/><text:span text:style-name="T1"> </text:span><text:span text:style-name="T2">(77/14) </text:span> ϫⲟⲟⲥ ⲉⲣⲟϥ ϫⲉ ⲡⲣⲱⲙⲉ ⲛ̅ⲁⲩⲧⲟ‐ <text:line-break/><text:span text:style-name="T1"> </text:span><text:span text:style-name="T2">(77/15) </text:span> ⲡⲁⲧⲱⲣ ⲁϥⲟⲩⲱⲛϩ ⲙ̅ⲡⲉⲉⲓ ⲉⲃⲟⲗ <text:line-break/><text:span text:style-name="T1"> </text:span><text:span text:style-name="T2">(77/16) </text:span> ⲁϥⲧⲁⲙⲓⲟ ⲛⲁϥ ⲛ̅ⲟⲩⲛⲟϭ ⲛ̅ⲁⲓⲱⲛ <text:line-break/><text:span text:style-name="T1"> </text:span><text:span text:style-name="T2">(77/17) </text:span> ⲡⲣⲟⲥ ⲧⲉϥⲙⲛ̅ⲧⲛⲟϭ ⲁϥϯ ⲛⲁϥ ⲛ̅‐ <text:line-break/><text:span text:style-name="T1"> </text:span><text:span text:style-name="T2">(77/18) </text:span> ⲟⲩⲛⲟϭ ⲛ̅ⲉⲝⲟⲩⲥⲓⲁ· ⲁϥⲣ̅ ⲣ̅ⲣⲟ ⲉϩⲣⲁⲓ̈ <text:line-break/><text:span text:style-name="T1"> </text:span><text:span text:style-name="T2">(77/19) </text:span> ⲉϫⲛ̅ ⲛ̅ⲥⲱⲛⲧ%6 ⲧⲏⲣⲟⲩ ⲁϥⲥⲱⲛⲧ%6 <text:line-break/><text:span text:style-name="T1"> </text:span><text:span text:style-name="T2">(77/20) </text:span> ⲛⲁϥ ⲛ̅ϩⲉⲛⲛⲟⲩⲧⲉ ⲙⲛ̅ ϩⲉⲛⲁⲣⲭⲁⲅ%6‐ <text:line-break/><text:span text:style-name="T1"> </text:span><text:span text:style-name="T2">(77/21) </text:span> ⲅⲉⲗⲟⲥ ⲙⲛ̅ ϩⲉⲛⲁⲅ%3ⲅⲉⲗⲟⲥ ϩⲉⲛⲧⲃⲁ <text:line-break/><text:span text:style-name="T1"> </text:span><text:span text:style-name="T2">(77/22) </text:span> ⲉⲙⲛ̅ⲧⲟⲩ ⲏⲡⲉ· ⲉϩⲟⲩⲛ ⲉⲩϩⲩⲡⲏ‐ <text:line-break/><text:span text:style-name="T1"> </text:span><text:span text:style-name="T2">(77/23) </text:span> ⲣⲉⲥⲓⲁ ⲉⲃⲟⲗ ϭⲉ ϩⲓⲧⲟⲟⲧϥ̅ ⲙ̅ⲡⲣⲱⲙⲉ <text:line-break/><text:span text:style-name="T1"> </text:span><text:span text:style-name="T2">(77/24) </text:span> ⲉⲧ̅ⲙ̅ⲙⲁⲩ ⲁⲥⲁⲣⲭⲉⲥⲑⲁⲓ ⲛ̅ϭⲓ ⲧⲙⲛ̅ⲧ‐ <text:line-break/><text:soft-page-break/><text:span text:style-name="T1"> </text:span><text:span text:style-name="T2">(78/1) </text:span> ⲛⲟⲩⲧⲉ ⲙ̣[ⲛ̅ ⲧⲙⲛⲧⲣ̅ⲣⲟ· ⲉ]ⲧ̣ⲃ̣ⲉ ⲡⲁⲓ̈ ⲁⲩϯ <text:line-break/><text:span text:style-name="T1"> </text:span><text:span text:style-name="T2">(78/2) </text:span> ⲣⲛ̅ϥ ϫⲉ ⲡⲛⲟ̣ⲩ̣[ⲧⲉ ⲛⲛ̅ⲛⲟⲩ]ⲧ̣ⲉ· ⲡⲣ̅ⲣⲟ <text:line-break/><text:span text:style-name="T1"> </text:span><text:span text:style-name="T2">(78/3) </text:span> ⲛ̅ⲣ̅ⲣⲱⲟⲩ· ⲡⲉϩⲟ[ⲩⲉⲓⲧ%6 ⲛ̅]ⲣⲱⲙⲉ <text:line-break/><text:span text:style-name="T1"> </text:span><text:span text:style-name="T2">(78/4) </text:span> ⲧⲡⲓⲥⲧⲓⲥ ⲡⲉ ⲛ̅ⲛ[ⲉ]ⲧ̣ⲛⲁϣⲱⲡⲉ· <text:line-break/><text:span text:style-name="T1"> </text:span><text:span text:style-name="T2">(78/5) </text:span> ⲙⲛ̅ⲛ̅ⲥⲁ ⲛⲁⲓ̈ ⲟⲩⲛⲧⲁϥ ⲛ̅ϩⲏⲧϥ̅ ⲛ̅‐ <text:line-break/><text:span text:style-name="T1"> </text:span><text:span text:style-name="T2">(78/6) </text:span> ⲟⲩϩⲓⲇⲓⲟⲛ ⲛ̅ⲛⲟⲩⲥ ⲟⲩⲉⲛⲛⲟⲓⲁ· ⲛ̅‐ <text:line-break/><text:span text:style-name="T1"> </text:span><text:span text:style-name="T2">(78/7) </text:span> ⲑⲉ ⲉⲧⲉ ϥⲟ ⲛ̅ⲙⲟⲥ ⲟⲩⲉⲛⲑⲩⲙⲏⲥⲓⲥ <text:line-break/><text:span text:style-name="T1"> </text:span><text:span text:style-name="T2">(78/8) </text:span> ⲙⲛ̅ ⲟⲩⲫⲣⲟⲛⲏⲥⲓⲥ ⲟⲩⲗⲟⲅⲓⲥⲙⲟⲥ <text:line-break/><text:span text:style-name="T1"> </text:span><text:span text:style-name="T2">(78/9) </text:span> ⲙⲛ̅ ⲟⲩⲇⲩⲛⲁⲙⲓⲥ· ⲙⲉⲗⲟⲥ ⲛⲓⲙ ⲉ‐ <text:line-break/><text:span text:style-name="T1"> </text:span><text:span text:style-name="T2">(78/10) </text:span> ⲧϣⲟⲟⲡ%6 ϩⲛ̅ⲧⲉⲗⲓⲟⲥ ⲛⲉ ϩⲛ̅ⲁⲑⲁⲛⲁ‐ <text:line-break/><text:span text:style-name="T1"> </text:span><text:span text:style-name="T2">(78/11) </text:span> ⲧⲟⲥ ⲛⲉ ⲕⲁⲧⲁ ⲙⲉⲛ ⲧⲁⲫⲑⲁⲣⲥⲓⲁ ⲥⲉ‐ <text:line-break/><text:span text:style-name="T1"> </text:span><text:span text:style-name="T2">(78/12) </text:span> ϣⲏϣ· ⲕⲁⲧⲁ ⲧϭⲟⲙ ⲟⲩⲛ̅ ⲟⲩⲇⲓⲁ‐ <text:line-break/><text:span text:style-name="T1"> </text:span><text:span text:style-name="T2">(78/13) </text:span> ⲫⲟⲣⲁ· ⲛ̅ⲑⲉ ⲛ̅ⲡϣⲓⲃⲉ ⲛ̅ⲟⲩⲉⲓⲱⲧ%6 <text:line-break/><text:span text:style-name="T1"> </text:span><text:span text:style-name="T2">(78/14) </text:span> ⲉⲩϣⲏⲣⲉ· ⲁⲩⲱ ⲟⲩϣⲏⲣⲉ ⲉⲩⲉⲛⲛⲟⲓⲁ <text:line-break/><text:span text:style-name="T1"> </text:span><text:span text:style-name="T2">(78/15) </text:span> ⲁⲩⲱ ⲧⲉⲛⲛⲟⲓⲁ ⲉⲡϣⲱϫⲡ%6 ⲛ̅ⲑⲉ ⲛ̅‐ <text:line-break/><text:span text:style-name="T1"> </text:span><text:span text:style-name="T2">(78/16) </text:span> ⲧⲁⲉⲓϣⲣ̅ⲡ%6 ⲛ̅ϫⲟⲟⲥ ϩⲛ̅ ⲛⲉⲛⲧⲁⲩϫⲡⲟ‐ <text:line-break/><text:span text:style-name="T1"> </text:span><text:span text:style-name="T2">(78/17) </text:span> ⲟⲩ· ⲧⲙⲟⲛⲁⲥ ⲟ͂ ⲛ̅ϣⲟⲣⲡ%6 ⲥⲟⲩⲏϩ <text:line-break/><text:span text:style-name="T1"> </text:span><text:span text:style-name="T2">(78/18) </text:span> ⲛ̅ⲥⲱⲥ ⲛ̅ϭⲓ ⲧⲇⲩⲁⲥ ⲙⲛ̅ ⲧⲉⲧⲣⲓⲁⲥ <text:line-break/><text:span text:style-name="T1"> </text:span><text:span text:style-name="T2">(78/19) </text:span> ϣⲁϩⲣⲁⲓ̈ ⲉⲛⲣⲁⲙⲏⲧ%6 ⲛ̅ⲣⲁⲙⲏⲧ%6 ⲇⲉ <text:line-break/><text:span text:style-name="T1"> </text:span><text:span text:style-name="T2">(78/20) </text:span> ⲥⲉⲁⲣⲭⲓ ⲉϫⲛ̅ ⲛ̅ⲣⲁϣⲉ· ⲉⲣⲉⲛ̅ⲣⲁϣⲉ <text:line-break/><text:span text:style-name="T1"> </text:span><text:span text:style-name="T2">(78/21) </text:span> ⲁⲣⲭⲓ ⲉϫⲛ̅ ⲛ̅ⲣⲁϣⲟ· ⲉⲣⲉⲛ̅ϣⲟ· ⲁⲣ‐ <text:line-break/><text:span text:style-name="T1"> </text:span><text:span text:style-name="T2">(78/22) </text:span> ⲭⲓ ⲉϫⲛ̅ ⲛⲉⲧⲃⲁ· ⲡⲉⲥⲙⲟⲧ%6 ⲡⲉ ⲡⲁⲓ̈ 〈ϩⲛ̅〉 <text:line-break/><text:span text:style-name="T1"> </text:span><text:span text:style-name="T2">(78/23) </text:span> 〈ⲛ̅〉ⲁⲑⲁⲛⲁⲧⲟⲥ ⲡⲉϩⲟⲩⲉⲓⲧ%6 ⲛ̅ⲣⲱ‐ <text:line-break/><text:span text:style-name="T1"> </text:span><text:span text:style-name="T2">(78/24) </text:span> ⲙⲉ ⲛ̅ⲧⲉⲉⲓϩⲉ· ⲧⲉϥⲙⲟⲛⲁⲥ ⲧⲉ <text:line-break/><text:span text:style-name="T1"> </text:span><text:span text:style-name="T2">(81/1) </text:span> ⲁϥⲧⲁⲙ[ⲓⲟ ⲛⲁϥ ⲛ̅ϩⲉⲛ]ⲁⲅ̣%6ⲅⲉⲗⲟⲥ <text:line-break/><text:span text:style-name="T1"> </text:span><text:span text:style-name="T2">(81/2) </text:span> ϩⲉⲛⲧⲃ[ⲁ ⲉⲙⲛ̅ⲧⲟⲩ] ⲏ̣ⲡⲉ ⲉϩⲟⲩⲛ <text:line-break/><text:span text:style-name="T1"> </text:span><text:span text:style-name="T2">(81/3) </text:span> ⲉⲩϩⲩⲡⲏⲣ̣ⲉ̣ⲥⲓⲁ· ⲡⲙⲏⲏϣⲉ ⲧⲏⲣϥ̅ <text:line-break/><text:span text:style-name="T1"> </text:span><text:span text:style-name="T2">(81/4) </text:span> ⲛ̅ⲛ̅ⲁⲅ%6ⲅⲉⲗ̣ⲟⲥ ⲉⲧⲙ̅ⲙⲁⲩ ϣⲁⲩϫⲟ‐ <text:line-break/><text:span text:style-name="T1"> </text:span><text:span text:style-name="T2">(81/5) </text:span> ⲟⲥ ⲉⲣⲟⲟⲩ ϫⲉ ⲧⲉⲕⲕⲗⲏⲥⲓⲁ ⲛ̅ⲛⲉ‐ <text:line-break/><text:span text:style-name="T1"> </text:span><text:span text:style-name="T2">(81/6) </text:span> ⲧⲟⲩⲁⲁⲃ· ⲛ̅ⲟⲩⲟⲉⲓⲛ ⲛ̅ⲁⲧϩⲁⲉⲓⲃⲉⲥ <text:line-break/><text:span text:style-name="T1"> </text:span><text:span text:style-name="T2">(81/7) </text:span> ⲛⲉⲧⲙ̅ⲙⲁⲩ ϭⲉ ⲉⲩϣⲁⲛⲁⲥⲡⲁⲍⲉ <text:line-break/><text:span text:style-name="T1"> </text:span><text:span text:style-name="T2">(81/8) </text:span> ⲛ̅ⲛⲉⲩⲉⲣⲏⲟⲩ ϣⲁⲣⲉⲛⲉⲩⲁⲥⲡⲁⲥ‐ <text:line-break/><text:span text:style-name="T1"> </text:span><text:span text:style-name="T2">(81/9) </text:span> ⲙⲟⲥ ϣⲱⲡⲉ ⲛ̅ϩⲉⲛⲁⲅ%6ⲅⲉⲗⲟⲥ ⲉⲩ‐ <text:line-break/><text:span text:style-name="T1"> </text:span><text:span text:style-name="T2">(81/10) </text:span> ⲉⲓⲛⲉ ⲙ̅ⲙⲟⲟⲩ ⲡⲉⲡⲣⲱⲧⲟⲅⲉⲛⲉ‐ <text:line-break/><text:span text:style-name="T1"> </text:span><text:span text:style-name="T2">(81/11) </text:span> ⲧⲱⲣ· ⲛ̅ⲉⲓⲱⲧ%6 ϣⲁⲩϫⲟⲟⲥ ⲉⲣⲟϥ <text:line-break/><text:span text:style-name="T1"> </text:span><text:span text:style-name="T2">(81/12) </text:span> ϫⲉ ⲁⲇⲁⲙ ⲡⲁ ⲡⲟⲩⲟⲉⲓⲛ· ⲧⲙⲛ̅ⲧⲣ̅‐ <text:line-break/><text:span text:style-name="T1"> </text:span><text:span text:style-name="T2">(81/13) </text:span> ⲣⲟ ⲇⲉ ⲙ̅ⲡϣⲏⲣⲉ ⲙ̅ⲡⲣⲱⲙⲉ ⲉⲥ‐ <text:line-break/><text:span text:style-name="T1"> </text:span><text:span text:style-name="T2">(81/14) </text:span> ⲙⲉϩ ⲛ̅ⲣⲁϣⲉ ⲛ̅ⲁⲧ%6ϣⲁϫⲉ ⲉⲣⲟϥ <text:line-break/><text:span text:style-name="T1"> </text:span><text:span text:style-name="T2">(81/15) </text:span> ⲙⲛ̅ ⲟⲩⲧⲉⲗⲏⲗ ⲉⲙⲉϥϣⲓⲃⲉ ⲉⲩⲧⲉⲣ‐ <text:line-break/><text:span text:style-name="T1"> </text:span><text:span text:style-name="T2">(81/16) </text:span> ⲡⲉ ⲉⲩⲙⲏⲛ ⲉⲃⲟⲗ ϩⲛ̅ ⲟⲩⲣⲁϣⲉ ⲛ̅ⲁⲧ%6‐ <text:line-break/><text:span text:style-name="T1"> </text:span><text:span text:style-name="T2">(81/17) </text:span> ϣⲁϫⲉ ⲉⲣⲟϥ ⲉϩⲣⲁⲓ̈ ⲉϫⲛ̅ ⲡⲉⲩⲉⲟⲟⲩ <text:line-break/><text:span text:style-name="T1"> </text:span><text:span text:style-name="T2">(81/18) </text:span> ⲛ̅ⲁⲧ%6ⲧⲁⲕⲟ· ⲡⲁⲓ̈ ⲉⲧⲉ ⲙ̅ⲡⲟⲩⲥⲟ‐ <text:line-break/><text:span text:style-name="T1"> </text:span><text:span text:style-name="T2">(81/19) </text:span> ⲧⲙⲉϥ ⲉⲛⲉϩ ⲟⲩⲇⲉ ⲙ̅ⲡⲉϥⲟⲩⲱⲛϩ <text:line-break/><text:span text:style-name="T1"> </text:span><text:span text:style-name="T2">(81/20) </text:span> ⲉⲛⲁⲓⲱⲛ ⲧⲏⲣⲟⲩ ⲛ̅ⲧⲁⲩϣⲱⲡⲉ <text:line-break/><text:span text:style-name="T1"> </text:span><text:span text:style-name="T2">(81/21) </text:span> ⲙⲛ̅ ⲛⲉⲩⲕⲟⲥⲙⲟⲥ· ⲡϣⲏⲣⲉ ϭⲉ <text:line-break/><text:span text:style-name="T1"> </text:span><text:span text:style-name="T2">(81/22) </text:span> ⲙ̅ⲡⲣⲱⲙⲉ ⲁϥⲥⲩⲙⲫⲱⲛⲉⲓ ⲙⲛ̅ <text:line-break/><text:span text:style-name="T1"> </text:span><text:span text:style-name="T2">(81/23) </text:span> ⲧⲥⲟⲫⲓⲁ ⲧⲉϥⲥⲩⲛⲍⲩⲅⲟⲥ ⲁϥⲟⲩ‐ <text:line-break/><text:soft-page-break/><text:span text:style-name="T1"> </text:span><text:span text:style-name="T2">(81/24) </text:span> ⲱⲛϩ ⲉⲃⲟⲗ ⲛ̅ⲟⲩⲛⲟϭ ⲛ̅ⲟⲩⲟⲉⲓⲛ <text:line-break/><text:span text:style-name="T1"> </text:span><text:span text:style-name="T2">(82/1) </text:span> ⲛ̅ϩⲟⲟⲩ̣ⲧ̣%6[ⲥϩⲓⲙⲉ· ⲡⲉϥⲣ]ⲁ̣ⲛ ⲙ̅ⲙⲛⲧ%6‐ <text:line-break/><text:span text:style-name="T1"> </text:span><text:span text:style-name="T2">(82/2) </text:span> ϩⲟⲟⲩⲧ%6 ϣⲁ〈ⲩ〉[ϫⲟⲟⲥ ⲉⲣⲟϥ] ϫ̣ⲉ ⲡⲥⲱ‐ <text:line-break/><text:span text:style-name="T1"> </text:span><text:span text:style-name="T2">(82/3) </text:span> ⲧⲏⲣ ⲡⲣⲉϥϫⲡⲉ ⲛ̅ⲕⲁ ⲛ̣[ⲓ]ⲙ ⲡⲉϥⲣⲁⲛ <text:line-break/><text:span text:style-name="T1"> </text:span><text:span text:style-name="T2">(82/4) </text:span> ⲙ̅ⲙⲛ̅ⲧⲥϩⲓⲙⲉ ϣⲁⲩϫⲟⲟⲥ ⲉⲣⲟϥ ϫⲉ <text:line-break/><text:span text:style-name="T1"> </text:span><text:span text:style-name="T2">(82/5) </text:span> ⲧⲥⲟⲫⲓⲁ ⲡⲁⲛⲅⲉⲛⲉⲧⲓⲣⲁ ϣⲁⲣⲉ <text:line-break/><text:span text:style-name="T1"> </text:span><text:span text:style-name="T2">(82/6) </text:span> ϩⲟⲉⲓⲛ ϫⲟⲟⲥ ⲉⲣⲟⲥ ϫⲉ ⲧⲡⲓⲥⲧⲓⲥ <text:line-break/><text:span text:style-name="T1"> </text:span><text:span text:style-name="T2">(82/7) </text:span> ⲡⲥⲱⲧⲏⲣ ϭⲉ ⲁϥⲥⲩⲙⲫⲱⲛⲉⲓ ⲙⲛ̅ <text:line-break/><text:span text:style-name="T1"> </text:span><text:span text:style-name="T2">(82/8) </text:span> ⲧⲉϥⲥⲩⲛⲍⲩⲅⲟⲥ ⲧⲡⲓⲥⲧⲓⲥ ⲥⲟⲫⲓⲁ <text:line-break/><text:span text:style-name="T1"> </text:span><text:span text:style-name="T2">(82/9) </text:span> ⲁϥⲟⲩⲱⲛϩ ⲛ̅ⲥⲟⲟⲩ ⲙ̅ⲡⲛⲉⲩⲙⲁ‐ <text:line-break/><text:span text:style-name="T1"> </text:span><text:span text:style-name="T2">(82/10) </text:span> ⲧⲓⲕⲟⲛ ⲛ̅ϩⲟⲟⲩⲧⲥϩⲓⲙⲉ ⲉⲡⲧⲩ‐ <text:line-break/><text:span text:style-name="T1"> </text:span><text:span text:style-name="T2">(82/11) </text:span> ⲡⲟⲥ ⲡⲉ ⲛ̅ⲛⲉⲧϩⲁⲧⲉⲩϩⲏ· ⲛ̅ϩⲟⲟⲩⲧ%6 <text:line-break/><text:span text:style-name="T1"> </text:span><text:span text:style-name="T2">(82/12) </text:span> ⲛ̅ⲉⲩⲣⲁⲛ ⲛⲉ ⲛⲁⲓ̈ ⲡϣⲟⲣⲡ%6 ⲡⲉ ⲡⲁ‐ <text:line-break/><text:span text:style-name="T1"> </text:span><text:span text:style-name="T2">(82/13) </text:span> ⲅⲉⲛⲛⲏⲧⲟⲥ ⲡⲙⲉϩⲥⲛⲁⲩ ⲡⲉ ⲡⲁⲩ‐ <text:line-break/><text:span text:style-name="T1"> </text:span><text:span text:style-name="T2">(82/14) </text:span> ⲧⲟⲅⲉⲛⲛⲏⲧⲟⲥ ⲡⲙⲉϩϣⲟⲙⲛⲧ%6 <text:line-break/><text:span text:style-name="T1"> </text:span><text:span text:style-name="T2">(82/15) </text:span> ⲡⲉ ⲡⲅⲉⲛⲉⲧⲱⲣ· ⲡⲙⲉϩϥⲧⲟⲟⲩ ⲡⲉ <text:line-break/><text:span text:style-name="T1"> </text:span><text:span text:style-name="T2">(82/16) </text:span> ⲡⲉⲡⲣⲱⲧⲟⲅⲉⲛⲉⲧⲱⲣ· ⲡⲙⲉϩϯ‐ <text:line-break/><text:span text:style-name="T1"> </text:span><text:span text:style-name="T2">(82/17) </text:span> ⲟⲩ ⲡⲉ ⲡⲁⲛⲅⲉⲛⲉⲧⲱⲣ· ⲡⲙⲉϩⲥⲟⲟⲩ <text:line-break/><text:span text:style-name="T1"> </text:span><text:span text:style-name="T2">(82/18) </text:span> ⲡⲉ ⲡⲁⲣⲭⲓⲅⲉⲛⲉⲧⲱⲣ· ⲛ̅ⲣⲁⲛ ϩⲱⲟⲩ <text:line-break/><text:span text:style-name="T1"> </text:span><text:span text:style-name="T2">(82/19) </text:span> ⲛ̅ⲛⲉϩⲓⲟⲙⲉ ⲛⲉ ⲛⲁⲓ̈· ⲧϣⲟⲣⲡ%6 ⲡⲉ <text:line-break/><text:span text:style-name="T1"> </text:span><text:span text:style-name="T2">(82/20) </text:span> ⲡ̅ⲡⲁⲛⲥⲟⲫⲟⲥ ⲥⲟⲫⲓⲁ· ⲧⲙⲉϩⲥⲛ̅ⲧⲉ <text:line-break/><text:span text:style-name="T1"> </text:span><text:span text:style-name="T2">(82/21) </text:span> ⲡⲉ ⲡⲁⲛⲙⲏⲧⲱⲣ· ⲥⲟⲫⲓⲁ· ⲧⲙⲉϩϣⲟ‐ <text:line-break/><text:span text:style-name="T1"> </text:span><text:span text:style-name="T2">(82/22) </text:span> ⲙ̅ⲧⲉ ⲡⲉ ⲡⲁⲛⲅⲉⲛⲉⲧⲓⲣⲁ ⲥⲟⲫⲓⲁ· <text:line-break/><text:span text:style-name="T1"> </text:span><text:span text:style-name="T2">(82/23) </text:span> ⲧⲙⲉϩϥⲧⲟⲉ ⲡⲉ ⲧⲉⲡⲣⲱⲧⲟⲅⲉⲛⲉⲧⲓ‐ <text:line-break/><text:span text:style-name="T1"> </text:span><text:span text:style-name="T2">(82/24) </text:span> ⲣⲁ ⲥⲟⲫⲓⲁ· ⲧⲙⲉϩϯⲉ ⲧⲉ ⲧⲁⲅⲁⲡⲏ ⲥⲟ‐ <text:line-break/><text:span text:style-name="T1"> </text:span><text:span text:style-name="T2">(83/1) </text:span> ⲫⲓⲁ· ⲧⲙ̣[ⲉϩⲥⲟⲉ ⲧⲉ ⲧⲡ]ⲓ̣ⲥⲧⲓⲥ ⲥⲟ‐ <text:line-break/><text:span text:style-name="T1"> </text:span><text:span text:style-name="T2">(83/2) </text:span> ⲫⲓⲁ· ⲉⲃ̣[ⲟⲗ ϩⲛ̅ ⲧⲉ]ⲩ̣ⲥⲩⲛⲫⲱⲛⲏ‐ <text:line-break/><text:span text:style-name="T1"> </text:span><text:span text:style-name="T2">(83/3) </text:span> ⲥⲓⲥ ⲛ̅ⲧⲁⲉⲓⲣ ϣⲣ̅ⲡ· ⲛ̅ϫⲟⲟⲩ ⲁⲩⲟⲩ‐ <text:line-break/><text:span text:style-name="T1"> </text:span><text:span text:style-name="T2">(83/4) </text:span> ⲱⲛϩ ϩⲛ̅ ⲛⲁⲓⲱⲛ ⲉⲧⲕ%6ⲏ ⲉϩⲣⲁⲓ̈ ⲛ̅ϭⲓ <text:line-break/><text:span text:style-name="T1"> </text:span><text:span text:style-name="T2">(83/5) </text:span> ⲛ̅ⲉⲛⲛⲟⲓⲁ· ⲉⲃⲟⲗ ϩⲛ̅ 〈ⲛ̅〉ⲉⲛⲛⲟⲓⲁ ⲛⲉⲛ‐ <text:line-break/><text:span text:style-name="T1"> </text:span><text:span text:style-name="T2">(83/6) </text:span> ⲑⲩⲙⲏⲥⲓⲥ ⲉⲃⲟⲗ ϩⲛ̅ ⲛⲉⲛⲑⲩⲙⲏⲥⲓⲥ <text:line-break/><text:span text:style-name="T1"> </text:span><text:span text:style-name="T2">(83/7) </text:span> ⲛⲉⲫⲣⲟⲛⲏⲥⲓⲥ ⲉⲃⲟⲗ ϩⲛ̅ ⲛⲉⲫⲣⲟⲛⲏ‐ <text:line-break/><text:span text:style-name="T1"> </text:span><text:span text:style-name="T2">(83/8) </text:span> ⲥⲓⲥ ⲛ̅ⲗⲟⲅⲓⲥⲙⲟⲥ· ⲉⲃⲟⲗ ϩⲛ̅ ⲛ̅ⲗⲟⲅⲓ‐ <text:line-break/><text:span text:style-name="T1"> </text:span><text:span text:style-name="T2">(83/9) </text:span> ⲥⲙⲟⲥ ⲛⲉⲑⲉⲗⲏⲥⲓⲥ· ⲉⲃⲟⲗ ϩⲛ̅ ⲛⲉ‐ <text:line-break/><text:span text:style-name="T1"> </text:span><text:span text:style-name="T2">(83/10) </text:span> ⲑⲉⲗⲏⲥⲓⲥ ⲛ̅ⲗⲟⲅⲟⲥ· ⲧⲙⲛ̅ⲧⲥ̅ⲛⲟⲟⲩⲥ <text:line-break/><text:span text:style-name="T1"> </text:span><text:span text:style-name="T2">(83/11) </text:span> ϭⲉ ⲛ̅ϭⲟⲙ ⲛ̅ⲧⲁⲉⲓⲣ̅ ϣⲣ̅ⲡ ⲛ̅ϫⲟⲟⲩ <text:line-break/><text:span text:style-name="T1"> </text:span><text:span text:style-name="T2">(83/12) </text:span> ⲁⲩⲥⲩⲙⲫⲱⲛⲉⲓ ⲙⲛ̅ ⲛⲉⲩⲉⲣⲏⲟⲩ <text:line-break/><text:span text:style-name="T1"> </text:span><text:span text:style-name="T2">(83/13) </text:span> ⲁⲩⲟⲩⲱⲛϩ ⲉⲃⲟⲗ ⲛ̅ϭⲓ ⲛ̅ϩⲟⲟⲩⲧ 〈ⲋ̅ ⲋ̅〉 <text:line-break/><text:span text:style-name="T1"> </text:span><text:span text:style-name="T2">(83/14) </text:span> ⲛⲉϩⲓⲟⲙⲉ 〈ⲋ̅ ⲋ̅〉· ϩⲱⲥⲧⲉ ⲛ̅ⲥⲉⲣ̅ ϣϥⲉ‐ <text:line-break/><text:span text:style-name="T1"> </text:span><text:span text:style-name="T2">(83/15) </text:span> ⲥⲛⲟⲟⲩⲥ ⲛ̅ⲇⲩⲛⲁⲙⲓⲥ· ⲧⲉϣϥⲉⲥⲛⲟ‐ <text:line-break/><text:span text:style-name="T1"> </text:span><text:span text:style-name="T2">(83/16) </text:span> ⲟⲩⲥ ⲁⲩⲟⲩⲱⲛϩ ⲉⲃⲟⲗ ⲛ̅ϭⲓ ⲧⲟⲩⲉⲓ ⲧⲟⲩ‐ <text:line-break/><text:span text:style-name="T1"> </text:span><text:span text:style-name="T2">(83/17) </text:span> ⲉⲓ ⲙ̅ⲙⲟⲟⲩ ⲛ̅ϯⲟⲩ ⲙ̅ⲡⲛⲉⲩⲙⲁⲧⲓ‐ <text:line-break/><text:span text:style-name="T1"> </text:span><text:span text:style-name="T2">(83/18) </text:span> ⲕⲟⲛ ⲉⲧⲉ ⲛⲁⲓ̈ ⲛⲉ ⲧϣⲙ̅ⲧϣⲉⲥⲉ ⲛ̅‐ <text:line-break/><text:span text:style-name="T1"> </text:span><text:span text:style-name="T2">(83/19) </text:span> ⲇⲩⲛⲁⲙⲓⲥ ⲡⲉⲩϩⲱⲧⲣ̅ ⲧⲏⲣⲟⲩ ⲡⲉ <text:line-break/><text:span text:style-name="T1"> </text:span><text:span text:style-name="T2">(83/20) </text:span> ⲡⲟⲩⲱϣ· ⲡⲁⲑⲁⲛⲁⲧⲟⲥ ϭⲉ ⲛ̅ⲣⲱⲙⲉ <text:line-break/><text:span text:style-name="T1"> </text:span><text:span text:style-name="T2">(83/21) </text:span> ⲁϥϣⲱⲡⲉ ⲛⲁϥ ⲛ̅ⲧⲩⲡⲟⲥ ⲛ̅ϭⲓ ⲡⲉⲛ‐ <text:line-break/><text:span text:style-name="T1"> </text:span><text:span text:style-name="T2">(83/22) </text:span> ⲁⲓⲱⲛ· ⲡⲉⲭⲣⲟⲛⲟⲥ ⲁϥϣⲱⲡⲉ ⲛ̅‐ <text:line-break/><text:soft-page-break/><text:span text:style-name="T1"> </text:span><text:span text:style-name="T2">(83/23) </text:span> ⲧⲩⲡⲟⲥ ⲙ̅ⲡⲉⲡⲣⲱⲧⲟⲅⲉⲛⲉⲧⲱⲣ <text:line-break/><text:span text:style-name="T1"> </text:span><text:span text:style-name="T2">(84/1) </text:span> ⲡⲉϥϣⲏ̣ⲣ̣[ⲉ· ⲧⲉⲣⲟⲙⲡⲉ ⲁ]ⲥ̣ϣ̣ⲱⲡⲉ ⲛ̅‐ <text:line-break/><text:span text:style-name="T1"> </text:span><text:span text:style-name="T2">(84/2) </text:span> ⲧⲩⲡⲟⲥ ⲙ̅ⲡ[ⲥⲱⲧⲏⲣ· ⲡⲙⲛ̅]ⲧ̣ⲥ̅ⲛⲟ‐ <text:line-break/><text:span text:style-name="T1"> </text:span><text:span text:style-name="T2">(84/3) </text:span> ⲟⲩⲥ ⲛ̅ⲉⲃⲟⲧ%6 ⲁⲩϣⲱⲡⲉ ⲛ̅ⲧⲩⲡⲟⲥ <text:line-break/><text:span text:style-name="T1"> </text:span><text:span text:style-name="T2">(84/4) </text:span> ⲛ̅ⲧⲙⲛ̅ⲧⲥ̅ⲛⲟⲟⲩⲥ ⲛ̅ϭⲟⲙ· ⲡϣⲙⲧ‐ <text:line-break/><text:span text:style-name="T1"> </text:span><text:span text:style-name="T2">(84/5) </text:span> {ⲧ}ϣⲉⲥⲉ ⲛ̅ⲧⲛ̅ ⲧⲉⲣⲟⲙ〈ⲡ〉ⲉ ⲛ̅ϩⲟⲟⲩ ⲛ̅‐ <text:line-break/><text:span text:style-name="T1"> </text:span><text:span text:style-name="T2">(84/6) </text:span> ⲧⲁⲩϣⲱⲡⲉ ⲛ̅ⲧⲩⲡⲟⲥ ⲛ̅ⲧϣⲙ̅ⲧϣⲉ‐ <text:line-break/><text:span text:style-name="T1"> </text:span><text:span text:style-name="T2">(84/7) </text:span> ⲥⲉ ⲛ̅ϭⲟⲙ· ⲛⲁⲓ̈ ⲛ̅ⲧⲁⲩⲟⲩⲱⲛϩ ⲉⲃⲟⲗ <text:line-break/><text:span text:style-name="T1"> </text:span><text:span text:style-name="T2">(84/8) </text:span> ϩⲙ̅ ⲡⲥⲱⲧⲏⲣ ⲛ̅ⲁⲅ%6ⲅⲉⲗⲟⲥ ⲛ̅ⲧⲁⲩ‐ <text:line-break/><text:span text:style-name="T1"> </text:span><text:span text:style-name="T2">(84/9) </text:span> ϣⲱⲡⲉ ⲉⲃⲟⲗ ϩⲛ̅ ⲛⲁⲓ̈ ⲉⲧⲉ ⲙⲛ̅ ⲏⲡⲉ <text:line-break/><text:span text:style-name="T1"> </text:span><text:span text:style-name="T2">(84/10) </text:span> ⲉⲣⲟⲟⲩ ⲁⲩϣⲱⲡⲉ ⲛⲁⲩ ⲛ̅ⲧⲩⲡⲟⲥ <text:line-break/><text:span text:style-name="T1"> </text:span><text:span text:style-name="T2">(84/11) </text:span> ⲛ̅ϭⲓ ⲛⲉⲩⲛⲟⲟⲩⲉ ⲙⲛ̅ ⲛⲉⲩⲥⲟⲩⲥⲟⲩ <text:line-break/><text:span text:style-name="T1"> </text:span><text:span text:style-name="T2">(84/12) </text:span> ⲛ̅ⲧⲉⲣⲟⲩⲱⲛϩ ⲇⲉ ⲉⲃⲟⲗ ⲛ̅ϭⲓ ⲛⲉⲛ‐ <text:line-break/><text:span text:style-name="T1"> </text:span><text:span text:style-name="T2">(84/13) </text:span> ⲧⲁⲉⲓϣⲁϫⲉ ⲉⲣⲟⲟⲩ ⲁϥⲧⲁⲙⲓⲟ ⲛⲁ〈ϥ〉 <text:line-break/><text:span text:style-name="T1"> </text:span><text:span text:style-name="T2">(84/14) </text:span> ⲛ̅ϭⲓ ⲡⲁⲛⲅⲉⲛⲉⲧⲱⲣ ⲡⲉⲩⲉⲓⲱⲧ%6 ⲛ̅‐ <text:line-break/><text:span text:style-name="T1"> </text:span><text:span text:style-name="T2">(84/15) </text:span> ϣⲟⲣⲡ%6 ⲙ̅ⲙⲛ̅ⲧⲥ̅ⲛⲟⲟⲩⲥ ⲛ̅ⲁⲓⲱⲛ <text:line-break/><text:span text:style-name="T1"> </text:span><text:span text:style-name="T2">(84/16) </text:span> ⲉϩⲟⲩⲛ ⲉⲧϩⲩⲡⲏⲣⲉⲥⲓⲁ ⲙ̅{ⲛ̅}ⲡⲙⲛ̅‐ <text:line-break/><text:span text:style-name="T1"> </text:span><text:span text:style-name="T2">(84/17) </text:span> ⲧⲥ̅ⲛⲟⲟⲩⲥ ⲛ̅ⲁⲅ’ⲅⲉⲗⲟⲥ· ⲁⲩⲱ ⲛ̅ϩⲣⲁⲓ̈ <text:line-break/><text:span text:style-name="T1"> </text:span><text:span text:style-name="T2">(84/18) </text:span> ϩⲛ̅ ⲛⲁⲓⲱⲛ ⲧⲏⲣⲟⲩ ⲛⲉⲩⲛ̅ ⲥⲟⲉ· ⲥⲟⲉ· <text:line-break/><text:span text:style-name="T1"> </text:span><text:span text:style-name="T2">(84/19) </text:span> ⲡⲉ· ϩⲙ̅ ⲡⲟⲩⲁ ⲡⲟⲩⲁ ⲙ̅ⲙⲟⲟⲩ ϩⲱⲥⲧⲉ <text:line-break/><text:span text:style-name="T1"> </text:span><text:span text:style-name="T2">(84/20) </text:span> ⲛ̅ⲥⲉⲣ̅ ϣϥⲉⲥⲛⲟⲟⲩⲥ ⲙ̅ⲡⲉ ⲛ̅ⲧⲉ ⲧⲉϣ‐ <text:line-break/><text:span text:style-name="T1"> </text:span><text:span text:style-name="T2">(84/21) </text:span> ϥⲉⲥⲛⲟⲟⲩⲉ ⲛ̅ϭⲟⲙ ⲛⲁⲓ̈ ⲛ̅ⲧⲁⲩⲟⲩⲱⲛϩ <text:line-break/><text:span text:style-name="T1"> </text:span><text:span text:style-name="T2">(84/22) </text:span> ⲉⲃⲟⲗ ⲛ̅ϩⲏⲧϥ̅· ⲁⲩⲱ ϩⲛ̅ ⲙ̅ⲡⲏⲟⲩⲉ <text:line-break/><text:span text:style-name="T1"> </text:span><text:span text:style-name="T2">(84/23) </text:span> ⲧⲏⲣⲟⲩ ⲛⲉⲟⲩⲛ ϯⲟⲩ ϯⲟⲩ ⲛ̅ⲥⲧⲉ‐ <text:line-break/><text:span text:style-name="T1"> </text:span><text:span text:style-name="T2">(84/24) </text:span> ⲣⲉⲱⲙⲁ ϩⲱⲥⲧⲉ ⲛ̅ⲥⲉⲣ̅ ϣⲙ̅ⲧϣⲉ‐ <text:line-break/><text:span text:style-name="T1"> </text:span><text:span text:style-name="T2">(85/1) </text:span> ⲥⲉ ⲛ̅ⲥⲧⲉ̣[ⲣⲉⲱⲙⲁ ⲛ̅]ⲧ̣ⲉ ⲧ̣ϣⲙⲧϣⲉ‐ <text:line-break/><text:span text:style-name="T1"> </text:span><text:span text:style-name="T2">(85/2) </text:span> ⲥⲉ ⲛ̅ϭⲟⲙ̣ [ⲛⲁⲓ̈ ⲛ̅ⲧⲁⲩⲟ]ⲩ̣ⲱⲛϩ ⲉⲃⲟⲗ <text:line-break/><text:span text:style-name="T1"> </text:span><text:span text:style-name="T2">(85/3) </text:span> ⲛ̅ϩⲏⲧⲟⲩ ⲛⲉⲥⲧⲉⲣⲉⲱⲙⲁ ⲛ̅ⲧⲉ‐ <text:line-break/><text:span text:style-name="T1"> </text:span><text:span text:style-name="T2">(85/4) </text:span> ⲣⲟⲩϫⲱⲕ ⲉⲃⲟⲗ ⲁⲩϯⲣⲛ̅ ⲛ〈ⲁ〉ⲩ ϫⲉ <text:line-break/><text:span text:style-name="T1"> </text:span><text:span text:style-name="T2">(85/5) </text:span> ⲧϣⲙ̅ⲧϣⲉⲥⲉ ⲛ̅ⲡⲉ ⲉⲡⲣⲁⲛ ⲛ̅ⲙ̅‐ <text:line-break/><text:span text:style-name="T1"> </text:span><text:span text:style-name="T2">(85/6) </text:span> ⲡⲏⲟⲩⲉ ⲉⲧϩⲁⲧⲉⲩϩⲏ· ⲁⲩⲱ ⲛⲁⲓ̈ ⲧⲏ‐ <text:line-break/><text:span text:style-name="T1"> </text:span><text:span text:style-name="T2">(85/7) </text:span> ⲣⲟⲩ ⲥⲉϫⲏⲕ ⲁⲩⲱ ⲛⲁⲛⲟⲩ ⲁⲩⲱ ⲛ̅ⲧⲉ‐ <text:line-break/><text:span text:style-name="T1"> </text:span><text:span text:style-name="T2">(85/8) </text:span> ⲉⲓϩⲉ ⲁϥⲟⲩⲱⲛϩ ⲉⲃⲟⲗ ⲛ̅ϭⲓ ⲡϩⲩⲥⲧⲉ‐ <text:line-break/><text:span text:style-name="T1"> </text:span><text:span text:style-name="T2">(85/9) </text:span> ⲣⲏⲙⲁ ⲛ̅ⲧⲙⲛ̅ⲧⲥ̅ϩⲓⲙⲉ· ⲡⲉϩⲟⲩⲉⲓⲧ%6 <text:line-break/><text:span text:style-name="T1"> </text:span><text:span text:style-name="T2">(85/10) </text:span> ϭⲉ ⲛ̅ⲁⲓⲱⲛ ⲡⲁ ⲡⲁⲑⲁⲛⲁⲧⲟⲥ ⲛ̅ⲣⲱⲙⲉ <text:line-break/><text:span text:style-name="T1"> </text:span><text:span text:style-name="T2">(85/11) </text:span> ⲡⲉ ⲡⲙⲉϩⲥⲛⲁⲩ ⲛ̅ⲁⲓⲱⲛ ⲡⲁ ⲡϣⲏⲣⲉ <text:line-break/><text:span text:style-name="T1"> </text:span><text:span text:style-name="T2">(85/12) </text:span> ⲙ̅ⲡⲣⲱⲙⲉ ⲡⲉ ⲡⲉⲧⲉϣⲁⲩϫⲟⲟⲥ ⲉ‐ <text:line-break/><text:span text:style-name="T1"> </text:span><text:span text:style-name="T2">(85/13) </text:span> ⲣⲟϥ ϫⲉ ⲡⲉⲡⲣⲱⲧⲟⲅⲉⲛⲉⲧⲱⲣ ⲡⲉⲧⲉ <text:line-break/><text:span text:style-name="T1"> </text:span><text:span text:style-name="T2">(85/14) </text:span> ϣⲁⲩⲙⲟⲩⲧⲉ ⲉⲣⲟϥ ϫⲉ ⲡⲥⲱⲧⲏⲣ <text:line-break/><text:span text:style-name="T1"> </text:span><text:span text:style-name="T2">(85/15) </text:span> ⲡⲉⲧⲉⲙⲁϩⲧⲉ ⲛ̅ⲛⲁⲓ̈ ⲡⲁⲓⲱⲛ ⲡⲉⲧⲉ <text:line-break/><text:span text:style-name="T1"> </text:span><text:span text:style-name="T2">(85/16) </text:span> ⲙ̅ⲛ ⲙⲛ̅ⲧⲣ̅ⲣⲟ ϩⲓϫⲱϥ ⲛ̅ⲧⲛ̅ ⲡϣⲁ <text:line-break/><text:span text:style-name="T1"> </text:span><text:span text:style-name="T2">(85/17) </text:span> ⲉⲛⲉϩ ⲛ̅ⲛⲟⲩⲧⲉ ⲛ̅ⲁⲡⲉⲣⲁⲛⲧⲟⲥ ⲡⲁⲓ‐ <text:line-break/><text:span text:style-name="T1"> </text:span><text:span text:style-name="T2">(85/18) </text:span> ⲱⲛ ⲛ̅ⲧⲉ ⲛⲓⲁⲓⲱⲛ ⲛ̅ⲧⲛ̅ ⲛⲁⲑⲁⲛⲁⲧⲟⲥ <text:line-break/><text:span text:style-name="T1"> </text:span><text:span text:style-name="T2">(85/19) </text:span> ⲉⲧⲛ̅ϩⲏⲧϥ̅· ⲡⲥⲁⲛϩⲣⲉ ⲛ̅ⲧⲙⲉϩϣ‐ <text:line-break/><text:span text:style-name="T1"> </text:span><text:span text:style-name="T2">(85/20) </text:span> ⲙⲟⲩⲛⲉ ⲛ̅ⲧⲁϩⲟⲩⲱⲛϩ ⲉⲃⲟⲗ ϩⲙ̅ ⲡ‐ <text:line-break/><text:span text:style-name="T1"> </text:span><text:span text:style-name="T2">(85/21) </text:span> ⲭⲁⲟⲥ ⲛ̅ⲧⲟϥ ⲇⲉ ⲡⲁⲑⲁⲛⲁⲧⲟⲥ ⲛ̅ⲣⲱ‐ <text:line-break/><text:span text:style-name="T1"> </text:span><text:span text:style-name="T2">(85/22) </text:span> ⲙⲉ ⲁϥⲟⲩⲱⲛϩ ⲉⲃⲟⲗ ⲛ̅ϩⲛ̅ⲁⲓⲱⲛ <text:line-break/><text:soft-page-break/><text:span text:style-name="T1"> </text:span><text:span text:style-name="T2">(85/23) </text:span> ⲙⲛ̅ ϩⲛ̅ϭⲟⲙ ⲙⲛ̅ ϩⲉⲛⲙⲛⲧⲣ̅ⲣⲟ <text:line-break/><text:span text:style-name="T1"> </text:span><text:span text:style-name="T2">(85/24) </text:span> ⲁϥϯ ⲛ̅ⲧⲉⲝⲟⲩⲥⲓⲁ ⲛ̅ⲟⲩⲟⲛ ⲛⲓⲙ· <text:line-break/><text:span text:style-name="T1"> </text:span><text:span text:style-name="T2">(86/1) </text:span> ⲛ̅ⲧⲁⲩ̣ⲟ̣[ⲩ]ⲱ̣[ⲛϩ ⲉⲃⲟⲗ ⲛ̅]ϩ̣ⲏⲧϥ̅· ⲉ‐ <text:line-break/><text:span text:style-name="T1"> </text:span><text:span text:style-name="T2">(86/2) </text:span> ⲧⲣⲟⲩⲧⲁⲛⲟ̣ [ⲛ̅ⲛⲁⲓ̈ ⲉⲧⲟⲩⲁ]ϣⲟⲩ <text:line-break/><text:span text:style-name="T1"> </text:span><text:span text:style-name="T2">(86/3) </text:span> ϣⲁ ⲛⲉϩⲟⲟⲩ ⲉⲧⲙ̣̅ⲡ̣〈ⲥ〉ⲁ̣ϩ̣ⲣ̣ⲉ ⲙ̅ⲡⲉⲭⲁ‐ <text:line-break/><text:span text:style-name="T1"> </text:span><text:span text:style-name="T2">(86/4) </text:span> ⲟⲥ ⲛⲁⲓ̈ ⲅⲁⲣ ⲁⲩⲥⲩⲙⲫⲱⲛⲓ ⲙⲛ̅ 〈ⲛ〉ⲉⲩ‐ <text:line-break/><text:span text:style-name="T1"> </text:span><text:span text:style-name="T2">(86/5) </text:span> ⲉⲣⲏⲟⲩ ⲁⲩⲟⲩⲱⲛϩ ⲉⲃⲟⲗ ⲙ̅ⲙⲛⲧ%6‐ <text:line-break/><text:span text:style-name="T1"> </text:span><text:span text:style-name="T2">(86/6) </text:span> ⲛⲟϭ ⲛⲓⲙ· ⲁⲩⲱ ⲉⲃⲟⲗ ϩⲛ̅ ⲟⲩⲡ̅ⲛ̅ⲁ̅ <text:line-break/><text:span text:style-name="T1"> </text:span><text:span text:style-name="T2">(86/7) </text:span> 〈ⲛ̅〉ⲟⲩⲙⲏⲏϣⲉ ⲛ̅ⲟⲩⲟⲉⲓⲛ ⲉⲩ‐ <text:line-break/><text:span text:style-name="T1"> </text:span><text:span text:style-name="T2">(86/8) </text:span> ϩⲁ ⲉⲟⲟⲩ ⲉⲙⲛ̅ⲧⲟⲩ ⲏⲡⲉ ⲛⲁⲓ̈ ⲛ̅‐ <text:line-break/><text:span text:style-name="T1"> </text:span><text:span text:style-name="T2">(86/9) </text:span> ⲧⲁⲩϯ ⲣⲓⲛⲟⲩ ⲛ̅ⲧⲁⲣⲭⲏ ⲉⲧⲉ ⲡⲉⲉⲓ <text:line-break/><text:span text:style-name="T1"> </text:span><text:span text:style-name="T2">(86/10) </text:span> ⲡⲉ ⲧⲉϩⲟⲩⲉⲓⲧⲉ ⲧⲙⲏⲧⲉ ⲙ〈ⲛ̅〉 ⲡϫⲱⲕ <text:line-break/><text:span text:style-name="T1"> </text:span><text:span text:style-name="T2">(86/11) </text:span> ⲉⲃⲟⲗ ⲉⲧⲉ ⲡⲁⲓ̈ ⲡⲉ ⲡⲉϩⲟⲩⲉⲓⲧ%6 ⲛ̅ⲁⲓ‐ <text:line-break/><text:span text:style-name="T1"> </text:span><text:span text:style-name="T2">(86/12) </text:span> ⲱⲛ ⲙⲛ̅ ⲡⲙⲉϩⲥⲛⲁⲩ ⲙⲛ̅ ⲡⲙⲉϩ‐ <text:line-break/><text:span text:style-name="T1"> </text:span><text:span text:style-name="T2">(86/13) </text:span> ϣⲟⲙⲛ̅ⲧ ⲡⲉϩⲟⲩⲉⲓⲧ%6 ⲁⲩϯ ⲣⲛ̅ϥ <text:line-break/><text:span text:style-name="T1"> </text:span><text:span text:style-name="T2">(86/14) </text:span> ϫⲉ ⲧⲙⲛ̅〈ⲧ〉ⲟⲩⲁ ⲁ〈ⲩⲱ〉 ⲧⲁⲛⲁⲡⲁⲩⲥⲓⲥ ⲉⲩ‐ <text:line-break/><text:span text:style-name="T1"> </text:span><text:span text:style-name="T2">(86/15) </text:span> ⲛ̅ⲧⲉ ⲡⲟⲩⲁ ⲡⲟⲩⲁ ⲙ̅ⲙⲁⲩ ⲡⲉϥ‐ <text:line-break/><text:span text:style-name="T1"> </text:span><text:span text:style-name="T2">(86/16) </text:span> ⲣⲁⲛ ϫⲉ ⲁⲩⲟⲛⲟⲙⲁⲍⲉ ⲛ̅ⲧⲉⲕⲕⲗⲏ‐ <text:line-break/><text:span text:style-name="T1"> </text:span><text:span text:style-name="T2">(86/17) </text:span> ⲥⲓⲁ {ϩ}ⲙ̅ⲡ〈ⲙⲉϩ〉ϣⲟⲙⲛ̅ⲧ ⲛ̅ⲁⲓⲱⲛ {ϫⲉ} ⲉ‐ <text:line-break/><text:span text:style-name="T1"> </text:span><text:span text:style-name="T2">(86/18) </text:span> ⲃⲟⲗ ϩⲙ̅ ⲡⲓⲁⲧⲟ ⲛ̅ⲙⲏⲏϣⲉ ⲛ̅ⲧⲁ‐ <text:line-break/><text:span text:style-name="T1"> </text:span><text:span text:style-name="T2">(86/19) </text:span> ϩⲟⲩⲱⲛϩ ⲉⲃⲟⲗ ϩⲙ̅ ⲡⲓⲟⲩⲁ ⲛ̅ⲟⲩ‐ <text:line-break/><text:span text:style-name="T1"> </text:span><text:span text:style-name="T2">(86/20) </text:span> ⲁⲧⲟ ⲉⲧⲃⲉ ⲡⲁⲓ̈ ⲉⲣⲉⲡⲓⲙⲏⲏϣⲉ <text:line-break/><text:span text:style-name="T1"> </text:span><text:span text:style-name="T2">(86/21) </text:span> ⲥⲱⲟⲩϩ ⲛ̅ⲥⲉⲉⲓ ⲉⲩⲙⲛ̅ⲧⲟⲩⲁ· <text:line-break/><text:span text:style-name="T1"> </text:span><text:span text:style-name="T2">(86/22) </text:span> ϣⲁⲩⲙⲟⲩⲧⲉ ⲉⲣⲟⲟⲩ ϫⲉ ⲉⲕⲕⲗⲏ‐ <text:line-break/><text:span text:style-name="T1"> </text:span><text:span text:style-name="T2">(86/23) </text:span> ⲥⲓⲁ ⲉⲃⲟⲗ ϩⲛ̅ ϯⲉⲕⲕⲗⲏⲥⲓⲁ ⲉⲧⲟⲩⲁⲧⲃ· <text:line-break/><text:span text:style-name="T1"> </text:span><text:span text:style-name="T2">(86/24) </text:span> ⲉⲧⲡⲉ ⲉⲧⲃⲉ ⲡⲉⲉⲓ ⲧⲉⲕⲕⲗⲏⲥⲓⲁ ⲛ̅‐ <text:line-break/><text:span text:style-name="T1"> </text:span><text:span text:style-name="T2">(87/1) </text:span> ⲧⲙⲉϩϣ̣[ⲙⲟⲩⲛⲉ· ⲁⲩⲟ]ⲩ̣ⲟ̣ⲛ̣ϩⲥ ⲉⲃⲟ̣[ⲗ] <text:line-break/><text:span text:style-name="T1"> </text:span><text:span text:style-name="T2">(87/2) </text:span> ⲉⲩϩⲁⲟⲩ̣[ⲧ%6ⲥϩⲓⲙⲉ· ⲁⲩ]ϯ̣ ⲣⲁⲛ ⲉⲣⲟⲥ <text:line-break/><text:span text:style-name="T1"> </text:span><text:span text:style-name="T2">(87/3) </text:span> ⲉⲕ ⲙⲉⲣⲟⲥ ⲛ̅ϩⲟⲟⲩⲧ%6 [ⲁ]ⲩⲱ ⲉⲕ%6 ⲙⲉⲣⲟⲥ <text:line-break/><text:span text:style-name="T1"> </text:span><text:span text:style-name="T2">(87/4) </text:span> ⲛ̅ⲥϩⲓⲙⲉ· ⲡϩⲟⲟⲩⲧ%6 ⲁⲩϯ ⲣⲛ̅ϥ ϫⲉ ⲉⲕ‐ <text:line-break/><text:span text:style-name="T1"> </text:span><text:span text:style-name="T2">(87/5) </text:span> ⲕⲗⲏⲥⲓⲁ ⲧⲉⲥϩⲓⲙⲉ ϫⲉ ⲍⲱⲏ ϫⲉ <text:line-break/><text:span text:style-name="T1"> </text:span><text:span text:style-name="T2">(87/6) </text:span> ⲕⲁⲁⲥ ⲉⲥⲛⲁⲟⲩⲱⲛϩ ⲉⲃⲟⲗ ϫⲉ ⲉⲃⲟⲗ <text:line-break/><text:span text:style-name="T1"> </text:span><text:span text:style-name="T2">(87/7) </text:span> ϩⲛ̅ ⲟⲩⲥϩⲓⲙⲉ ⲁⲡⲱⲛϩ ϣⲱⲡⲉ· ϩⲛ̅ <text:line-break/><text:span text:style-name="T1"> </text:span><text:span text:style-name="T2">(87/8) </text:span> ⲛⲁⲓⲱⲛ ⲧⲏⲣⲟⲩ· ⲣⲁⲛ ⲛⲓⲙ ⲉⲁⲩϫⲓ‐ <text:line-break/><text:span text:style-name="T1"> </text:span><text:span text:style-name="T2">(87/9) </text:span> ⲧⲟⲩ ϫⲓⲛ ⲛ̅ⲧⲁⲣⲭⲏ ⲉⲃⲟⲗ ϩⲙ̅ ⲡⲉϥ‐ <text:line-break/><text:span text:style-name="T1"> </text:span><text:span text:style-name="T2">(87/10) </text:span> ⲙⲉⲧⲉ ⲙⲛ̅ ⲧⲉϥⲉⲛⲛⲟⲓⲁ ⲁⲩⲟⲩⲱⲛϩ <text:line-break/><text:span text:style-name="T1"> </text:span><text:span text:style-name="T2">(87/11) </text:span> ⲛ̅ϭⲓ ⲛ̅ⲇⲩⲛⲁⲙⲓⲥ ⲛⲁⲓ̈ ⲛ̅ⲧⲁⲩϯ ⲣⲓ‐ <text:line-break/><text:span text:style-name="T1"> </text:span><text:span text:style-name="T2">(87/12) </text:span> ⲛⲟⲩ ϫⲉ ⲛ̅ⲛⲟⲩⲧⲉ· ⲛ̅ⲛⲟⲩⲧⲉ ⲇⲉ <text:line-break/><text:span text:style-name="T1"> </text:span><text:span text:style-name="T2">(87/13) </text:span> ⲉⲃⲟⲗ ϩⲛ̅ ⲛⲉⲩⲫⲣⲟⲛⲏⲥⲓⲥ ⲁⲩⲟⲩ‐ <text:line-break/><text:span text:style-name="T1"> </text:span><text:span text:style-name="T2">(87/14) </text:span> ⲱⲛϩ ⲉⲃⲟⲗ ⲛ̅ϩⲛⲛⲟⲩⲧⲉ ⲛ̅ⲛⲟⲩ‐ <text:line-break/><text:span text:style-name="T1"> </text:span><text:span text:style-name="T2">(87/15) </text:span> ⲧⲉ· ⲛ̅ⲛⲟⲩⲧⲉ ⲇⲉ ⲉⲃⲟⲗ ϩⲛ̅ ⲛⲉⲩ‐ <text:line-break/><text:span text:style-name="T1"> </text:span><text:span text:style-name="T2">(87/16) </text:span> ⲫⲣⲟⲛⲏⲥⲓⲥ ⲁⲩⲟⲩⲱⲛϩ ⲛ̅ϩⲛ̅ϫⲟ‐ <text:line-break/><text:span text:style-name="T1"> </text:span><text:span text:style-name="T2">(87/17) </text:span> ⲉⲓⲥ· ⲛ̅ϫⲟⲉⲓⲥ ⲇⲉ ⲛ̅ⲛ̅ϫⲟⲉⲓⲥ ⲉⲃⲟⲗ <text:line-break/><text:span text:style-name="T1"> </text:span><text:span text:style-name="T2">(87/18) </text:span> ϩⲛ̅ ⲛⲉⲩⲗⲟⲅⲟⲥ ⲁⲩⲟⲩⲱⲛϩ ⲉⲃⲟⲗ <text:line-break/><text:span text:style-name="T1"> </text:span><text:span text:style-name="T2">(87/19) </text:span> ⲛ̅ϩⲛ̅ϫⲟⲉⲓⲥ· ⲛ̅ϫⲟⲉⲓⲥ ⲇⲉ ⲉⲃⲟⲗ ϩⲛ̅ <text:line-break/><text:span text:style-name="T1"> </text:span><text:span text:style-name="T2">(87/20) </text:span> ⲛⲉⲩϭⲟⲙ ⲁⲩⲟⲩⲱⲛϩ ⲉⲃⲟⲗ ⲛ̅ϩⲉⲛ‐ <text:line-break/><text:span text:style-name="T1"> </text:span><text:span text:style-name="T2">(87/21) </text:span> ⲁⲣⲭⲁⲅ%3ⲅⲉⲗⲟⲥ· ⲛⲁⲣⲭⲁⲅ%3ⲅⲉⲗⲟⲥ ⲁⲩ‐ <text:line-break/><text:soft-page-break/><text:span text:style-name="T1"> </text:span><text:span text:style-name="T2">(87/22) </text:span> ⲟⲩⲱⲛϩ ⲉⲃⲟⲗ ⲛ̅ϩⲉⲛⲁⲅ%3ⲅⲉⲗⲟⲥ ⲉ‐ <text:line-break/><text:span text:style-name="T1"> </text:span><text:span text:style-name="T2">(87/23) </text:span> ⲃⲟⲗ ϩⲛ̅ 〈ⲛ〉ⲁⲓ̈ ⲁⲧϩⲓⲇⲉⲁ ⲟⲩⲱⲛϩ· <text:line-break/><text:span text:style-name="T1"> </text:span><text:span text:style-name="T2">(88/1) </text:span> ϩⲓ· ⲥⲭ̣ⲏ̣ⲙ̣[ⲁ ϩⲓ̈ ⲙⲟⲣⲫⲏ] ⲉϯ ⲣⲁⲛ <text:line-break/><text:span text:style-name="T1"> </text:span><text:span text:style-name="T2">(88/2) </text:span> ⲉⲛⲓⲁⲓ[ⲱⲛ ⲧⲏⲣⲟⲩ ⲙⲛ̅] ⲛⲉⲩⲕⲟ‐ <text:line-break/><text:span text:style-name="T1"> </text:span><text:span text:style-name="T2">(88/3) </text:span> ⲥⲙⲟⲥ· ⲛⲁ[ⲑ]ⲁ̣ⲛⲁⲧⲟⲥ ⲧⲏⲣⲟⲩ ⲛ̅ⲧⲁ‐ <text:line-break/><text:span text:style-name="T1"> </text:span><text:span text:style-name="T2">(88/4) </text:span> ⲉⲓⲣ̅ ϣⲣ̅ⲡ ⲛ̅ϫⲟⲟⲩ ⲉⲩⲛ̅ⲧⲟⲩ ⲧⲉ‐ <text:line-break/><text:span text:style-name="T1"> </text:span><text:span text:style-name="T2">(88/5) </text:span> ⲝⲟⲩⲥⲓⲁ ⲧⲏⲣⲟⲩ ⲉⲃⲟⲗ ϩⲛ̅ ⲧϭⲟⲙ ⲙ̅‐ <text:line-break/><text:span text:style-name="T1"> </text:span><text:span text:style-name="T2">(88/6) </text:span> ⲡⲓⲁⲑⲁⲛⲁⲧⲟⲥ ⲛ̅ⲣⲱⲙⲉ ⲙⲛ̅ ⲧⲥⲟ‐ <text:line-break/><text:span text:style-name="T1"> </text:span><text:span text:style-name="T2">(88/7) </text:span> ⲫⲓⲁ ⲧⲉϥⲥⲩⲛⲍⲩⲅⲟⲥ ⲧⲁⲓ̈ ⲛ̅ⲧⲁⲩ‐ <text:line-break/><text:span text:style-name="T1"> </text:span><text:span text:style-name="T2">(88/8) </text:span> ϫⲟⲟⲥ ⲉⲣⲟⲥ ϫⲉ ⲥⲓⲅⲏ· ⲛ̅ⲧⲁⲩϯ ⲣⲛ̅ⲥ <text:line-break/><text:span text:style-name="T1"> </text:span><text:span text:style-name="T2">(88/9) </text:span> ϫⲉ ⲥⲓⲅⲏ ϫⲉ ⲛ̅ϩⲣⲁⲓ̈ ϩⲛ̅ ⲟⲩⲉⲛⲑⲩⲙⲏ‐ <text:line-break/><text:span text:style-name="T1"> </text:span><text:span text:style-name="T2">(88/10) </text:span> ⲥⲓⲥ ⲁϫⲛ̅ ϣⲁϫⲉ ⲁⲥϫⲱⲕ ⲛ̅ⲧⲉⲥ‐ <text:line-break/><text:span text:style-name="T1"> </text:span><text:span text:style-name="T2">(88/11) </text:span> ⲙⲛ̅ⲧⲛⲟϭ ⲛ̅ⲁⲫⲑⲁⲣⲥⲓⲁ ⲉⲩⲛ̅ⲧⲁⲩ <text:line-break/><text:span text:style-name="T1"> </text:span><text:span text:style-name="T2">(88/12) </text:span> ⲛ̅ⲧⲉⲝⲟⲩⲥⲓⲁ ⲁⲩⲧⲥⲁⲛⲟ ⲛⲁⲩ ⲛ̅ϭⲓ <text:line-break/><text:span text:style-name="T1"> </text:span><text:span text:style-name="T2">(88/13) </text:span> ⲡⲟⲩⲁ ⲡⲟⲩⲁ ⲙ̅ⲙⲟⲟⲩ ⲛ̅ϩⲉⲛⲛⲟϭ <text:line-break/><text:span text:style-name="T1"> </text:span><text:span text:style-name="T2">(88/14) </text:span> ⲙ̅ⲙⲛ̅ⲧⲣ̅ⲣⲱⲟⲩ ϩⲛ̅ ⲙ̅ⲡⲏⲟⲩⲉ ⲧⲏ‐ <text:line-break/><text:span text:style-name="T1"> </text:span><text:span text:style-name="T2">(88/15) </text:span> ⲣⲟⲩ ⲛ̅ⲁⲑⲁⲛⲁⲧⲟⲥ ⲙ̅ⲛ ⲛⲉⲩⲥⲧⲉ‐ <text:line-break/><text:span text:style-name="T1"> </text:span><text:span text:style-name="T2">(88/16) </text:span> ⲣⲉⲱⲙⲁ ϩⲛ̅ⲑⲣⲟⲛⲟⲥ ϩⲉⲛⲣ̅ⲡⲉ <text:line-break/><text:span text:style-name="T1"> </text:span><text:span text:style-name="T2">(88/17) </text:span> ⲡⲣⲟⲥ ⲧⲉⲩⲙⲛ̅ⲧⲛⲟϭ ϩⲟⲓ̈ⲛⲉ ⲙⲉⲛ <text:line-break/><text:span text:style-name="T1"> </text:span><text:span text:style-name="T2">(88/18) </text:span> ϩⲛ̅ ⲙ̅ⲙⲁ ⲛ̅ϣⲱⲡⲉ ⲙⲛ̅ ϩⲉⲛϩⲁⲣ‐ <text:line-break/><text:span text:style-name="T1"> </text:span><text:span text:style-name="T2">(88/19) </text:span> ⲙⲁ ⲉⲩϩⲁ ⲉⲟⲟⲩ ⲛ̅ⲁⲧϣⲁϫⲉ ⲉⲣⲟⲟⲩ <text:line-break/><text:span text:style-name="T1"> </text:span><text:span text:style-name="T2">(88/20) </text:span> ⲛⲁⲓ̈ ⲉⲙⲛ̅ ϣϭⲟⲙ ⲉϫⲟⲟⲩ ϩⲙ̅ ⲫⲩ‐ <text:line-break/><text:span text:style-name="T1"> </text:span><text:span text:style-name="T2">(88/21) </text:span> ⲥⲓⲥ ⲛⲓⲙ· ⲁⲩⲧⲥⲁⲛⲟ ⲛⲁⲩ ⲛ̅ϩⲉⲛ‐ <text:line-break/><text:span text:style-name="T1"> </text:span><text:span text:style-name="T2">(88/22) </text:span> ⲥⲧⲣⲁⲧⲓⲁ ⲛ̣̅ⲁⲅ%6ⲅⲉⲗⲟⲥ ϩⲉⲛⲧⲃⲁ ⲉ‐ <text:line-break/><text:span text:style-name="T1"> </text:span><text:span text:style-name="T2">(88/23) </text:span> ⲙⲛ̅ⲧⲟⲩ ⲏⲡⲉ ⲉϩⲟⲩⲛ ⲉⲩϩⲩⲡⲏ‐ <text:line-break/><text:span text:style-name="T1"> </text:span><text:span text:style-name="T2">(89/1) </text:span> ⲣⲉⲥⲓⲁ ⲙⲛ̅ ⲟⲩⲉⲟⲟⲩ ⲉⲧⲓ ϩⲉⲛⲡⲁⲣⲑ̣[ⲉ]‐ <text:line-break/><text:span text:style-name="T1"> </text:span><text:span text:style-name="T2">(89/2) </text:span> ⲛⲟⲥ 〈ⲙ̅〉ⲡ̅ⲛ̅ⲁ̅ ⲛⲟⲩⲟⲉⲓⲛ ⲛ̅ⲁⲧϣⲁϫⲉ <text:line-break/><text:span text:style-name="T1"> </text:span><text:span text:style-name="T2">(89/3) </text:span> ⲉⲣⲟⲟⲩ· ⲙ̅ⲙⲛ̅ ϩⲓⲥⲉ ⲙ̅ⲙⲁⲩ ϩⲁⲧⲏ‐ <text:line-break/><text:span text:style-name="T1"> </text:span><text:span text:style-name="T2">(89/4) </text:span> ⲟⲩ ⲙⲛ̅ ⲙⲛ̅ⲧ%6ⲁⲧϭⲟⲙ· ⲁⲗⲗⲁ ⲟⲩⲱϣⲉ <text:line-break/><text:span text:style-name="T1"> </text:span><text:span text:style-name="T2">(89/5) </text:span> ⲙ̅ⲙⲁⲧⲉ ⲡⲉ· ϣⲁϥϣⲱⲡⲉ ⲛ̅ⲧⲉⲩ‐ <text:line-break/><text:span text:style-name="T1"> </text:span><text:span text:style-name="T2">(89/6) </text:span> ⲛⲟⲩ ⲛ̅ⲧⲉⲉⲓϩⲉ· ⲁⲩϫⲱⲕ ⲉⲃⲟⲗ ⲛ̅ϭⲓ <text:line-break/><text:span text:style-name="T1"> </text:span><text:span text:style-name="T2">(89/7) </text:span> ⲛⲁⲓⲱⲛ ⲙⲛ̅ ⲛⲉⲩⲡⲉ· ⲙⲛ̅ ⲛⲉⲥⲧⲉⲣⲉ‐ <text:line-break/><text:span text:style-name="T1"> </text:span><text:span text:style-name="T2">(89/8) </text:span> ⲱⲙⲁ ⲙ̅ⲡⲉⲟⲟⲩ ⲙ̅ⲡⲁⲑⲁⲛⲁⲧⲟⲥ <text:line-break/><text:span text:style-name="T1"> </text:span><text:span text:style-name="T2">(89/9) </text:span> ⲛ̅ⲣⲱⲙⲉ ⲙⲛ̅ ⲧⲥⲟⲫⲓⲁ ⲧⲉϥⲥⲩⲛ‐ <text:line-break/><text:span text:style-name="T1"> </text:span><text:span text:style-name="T2">(89/10) </text:span> ⲍⲩⲅⲟⲥ ⲡⲙⲁ ⲉⲧⲁ〈ϥϣⲱⲡ ⲉⲣⲟϥ ⲛ̅ⲧⲉⲥⲙⲟⲧ ⲛ̅〉ⲉⲱⲛ ⲛⲓⲙ ⲙⲛ̅ <text:line-break/><text:span text:style-name="T1"> </text:span><text:span text:style-name="T2">(89/11) </text:span> ⲛⲉⲩⲕⲟⲥⲙⲟⲥ ⲙⲛ̅ ⲛⲉⲛⲧⲁⲩϣⲱ‐ <text:line-break/><text:span text:style-name="T1"> </text:span><text:span text:style-name="T2">(89/12) </text:span> ⲡⲉ ⲙⲛ̅ⲛ̅ⲥⲁ ⲛⲁⲓ̈ ⲉⲧⲣⲟⲩⲧⲥⲁⲛⲟ ⲛ̅‐ <text:line-break/><text:span text:style-name="T1"> </text:span><text:span text:style-name="T2">(89/13) </text:span> ⲛ̅ⲧⲩⲡⲟⲥ ⲙ̅ⲡⲙⲁ ⲉⲧⲙ̅ⲙⲁⲩ ⲛⲉⲩ‐ <text:line-break/><text:span text:style-name="T1"> </text:span><text:span text:style-name="T2">(89/14) </text:span> ⲉⲓⲛⲉ ϩⲛ̅ ⲙ̅ⲡⲏⲟⲩⲉ ⲙ̅ⲡⲉⲭⲁⲟⲥ ⲙⲛ̅ <text:line-break/><text:span text:style-name="T1"> </text:span><text:span text:style-name="T2">(89/15) </text:span> ⲛⲉⲩⲕⲟⲥⲙⲟⲥ· ⲧⲉⲫⲩⲥⲓⲥ ⲇⲉ ⲧⲏⲣⲥ̅ <text:line-break/><text:span text:style-name="T1"> </text:span><text:span text:style-name="T2">(89/16) </text:span> ⲉⲃⲟⲗ ϩⲙ̅ ⲡⲁⲑⲁⲛⲁⲧⲟⲥ ϫⲓⲛ ⲙ̅ⲡⲁ‐ <text:line-break/><text:span text:style-name="T1"> </text:span><text:span text:style-name="T2">(89/17) </text:span> ⲅⲉⲛⲛⲏⲧⲟⲥ ϣⲁ ⲡϭⲱⲗⲡ%6 ⲉⲃⲟⲗ ⲙ̅‐ <text:line-break/><text:span text:style-name="T1"> </text:span><text:span text:style-name="T2">(89/18) </text:span> ⲡⲉⲭⲁⲟⲥ ϩⲙ̅ ⲡⲟⲩⲟⲉⲓⲛ ⲉⲧⲣ̅ ⲟⲩⲟⲉⲓⲛ· <text:line-break/><text:span text:style-name="T1"> </text:span><text:span text:style-name="T2">(89/19) </text:span> ⲛ̅ⲁⲧϩⲁⲉⲓⲃⲉⲥ ⲙⲛ̅ ⲟⲩⲣⲁϣⲉ ⲛ̅ⲁⲧϣⲁ‐ <text:line-break/><text:span text:style-name="T1"> </text:span><text:span text:style-name="T2">(89/20) </text:span> ϫⲉ ⲉⲣⲟϥ ⲙⲛ̅ ⲟⲩⲧⲉⲗⲏⲗ ⲛ̅ⲛⲁⲧϫⲟ‐ <text:line-break/><text:span text:style-name="T1"> </text:span><text:span text:style-name="T2">(89/21) </text:span> ⲟϥ ⲉⲩⲧⲉⲣⲡⲉⲥⲑⲁⲓ ⲉⲩⲙⲏⲛ ⲉⲃⲟⲗ <text:line-break/><text:span text:style-name="T1"> </text:span><text:span text:style-name="T2">(89/22) </text:span> ⲉϩⲣⲁⲓ̈ ⲉϫⲙ̅ ⲡⲉⲩⲉⲟⲟⲩ ⲉⲧⲉ ⲙⲉϥ‐ <text:line-break/><text:soft-page-break/><text:span text:style-name="T1"> </text:span><text:span text:style-name="T2">(89/23) </text:span> ϣⲓⲃⲉ ⲙⲛ̅ ⲧⲁⲛⲁⲡⲁⲩⲥⲓⲥ ⲉⲧⲉ ⲙⲉⲩ‐ <text:line-break/><text:span text:style-name="T1"> </text:span><text:span text:style-name="T2">(89/24) </text:span> ϣⲓⲧⲥ̅ ⲧⲁⲓ̈ ⲉⲧⲉ ⲙⲛ̅ ϣϭⲟⲙ ⲉϣⲁϫⲉ <text:line-break/><text:span text:style-name="T1"> </text:span><text:span text:style-name="T2">(90/1) </text:span> ⲉⲣⲟⲥ ⲟⲩⲇⲉ ⲛ̅ⲛⲉⲩⲉϣⲛⲟⲉⲓ <text:line-break/><text:span text:style-name="T1"> </text:span><text:span text:style-name="T2">(90/2) </text:span> ⲙ̅ⲙⲟⲥ ⲛ̅ϩⲣⲁⲓ̈ ϩⲛ̅ ⲛⲁⲓⲱⲛ ⲧⲏ‐ <text:line-break/><text:span text:style-name="T1"> </text:span><text:span text:style-name="T2">(90/3) </text:span> ⲣⲟⲩ ⲛ̅ⲧⲁⲩϣⲱⲡⲉ ⲙⲛ̅ ⲛⲉⲩϭⲟⲙ <text:line-break/><text:span text:style-name="T1"> </text:span><text:span text:style-name="T2">(90/4) </text:span> ⲁⲩⲱ ϩⲱ ϣⲁ ⲡⲉⲉⲓⲙⲁ· ⲛⲁⲓ̈ ⲇⲉ ⲧⲏ‐ <text:line-break/><text:span text:style-name="T1"> </text:span><text:span text:style-name="T2">(90/5) </text:span> ⲣⲟⲩ ⲛ̅ⲧⲁⲉⲓⲣ̅ ϣⲣⲡ%6 ⲛ̅ϫⲟⲟⲩ ⲛⲁⲕ <text:line-break/><text:span text:style-name="T1"> </text:span><text:span text:style-name="T2">(90/6) </text:span> ⲁⲉⲓϫⲟⲟⲩ ⲕⲁⲧⲁ ⲑⲉ ⲉⲧⲕⲛⲁϣ <text:line-break/><text:span text:style-name="T1"> </text:span><text:span text:style-name="T2">(90/7) </text:span> ⲧⲱⲟⲩⲛ ⲙ̅ⲙⲟⲥ· ϣⲁⲛⲧⲉⲡⲓⲁⲧ%6 <text:line-break/><text:span text:style-name="T1"> </text:span><text:span text:style-name="T2">(90/8) </text:span> ϯ ⲥⲃⲱ ⲟⲩⲱⲛϩ ⲉⲃⲟⲗ· ⲛ̅ϩⲏⲧⲕ· <text:line-break/><text:span text:style-name="T1"> </text:span><text:span text:style-name="T2">(90/9) </text:span> ⲁⲩⲱ ⲛⲁⲓ̈ ⲧⲏⲣⲟⲩ ϥⲛⲁϫⲟⲟⲩ ⲉ‐ <text:line-break/><text:span text:style-name="T1"> </text:span><text:span text:style-name="T2">(90/10) </text:span> ⲣⲟⲕ ϩⲛ̅ ⲟⲩⲣⲁϣⲉ ⲙⲛ̅ ⲟⲩⲥⲟⲟⲩⲛ <text:line-break/><text:span text:style-name="T1"> </text:span><text:span text:style-name="T2">(90/11) </text:span> ⲉϥⲧⲟⲩⲃⲏⲟⲩ <text:line-break/><text:span text:style-name="T1"> </text:span><text:span text:style-name="T2">(90/12) </text:span> ⲉⲩⲅⲛⲱⲥⲧⲟⲥ ⲡⲙⲁ‐ <text:line-break/><text:span text:style-name="T1"> </text:span><text:span text:style-name="T2">(90/13) </text:span> ⲕⲁⲣⲓⲟⲥ </text:p>
      <text:p text:style-name="P1"/>
      <text:p text:style-name="P3">( codex III ) The Sophia of Jesus Christ</text:p>
      <text:p text:style-name="P2"><text:span text:style-name="T1"> </text:span><text:span text:style-name="T2">(90/14) </text:span> ⲧⲥⲟⲫⲓⲁ ⲛ̅ⲓ̅ⲏ̅ⲥ̅ ⲡⲉⲭ̅ⲣⲥ̅ ⲙⲛ̅ⲛ̅‐ <text:line-break/><text:span text:style-name="T1"> </text:span><text:span text:style-name="T2">(90/15) </text:span> ⲥⲁ ⲧⲣⲉϥⲧⲱⲟⲩⲛ ⲉⲃⲟⲗ ϩⲛ̅ ⲛⲉ‐ <text:line-break/><text:span text:style-name="T1"> </text:span><text:span text:style-name="T2">(90/16) </text:span> ⲧⲙⲟⲟⲩⲧ%3 ⲛⲉⲣⲉⲡⲉϥⲙⲛ̅ⲧⲥ̅ⲛⲟ‐ <text:line-break/><text:span text:style-name="T1"> </text:span><text:span text:style-name="T2">(90/17) </text:span> ⲟⲩⲥ ⲙ̅ⲙⲁⲑⲏⲧⲏⲥ ⲙⲛ̅ ⲥⲁϣϥⲉ <text:line-break/><text:span text:style-name="T1"> </text:span><text:span text:style-name="T2">(90/18) </text:span> ⲛ̅ⲥϩⲓⲙⲉ ⲙⲁⲑⲏⲧⲉⲩⲉ ⲛⲁϥ ⲉ‐ <text:line-break/><text:span text:style-name="T1"> </text:span><text:span text:style-name="T2">(90/19) </text:span> ⲁⲩⲉⲓ ⲉⲧⲅⲁⲗⲓⲗⲁⲓⲁ ⲉϫⲙ̅ ⲡⲧⲟⲟⲩ <text:line-break/><text:span text:style-name="T1"> </text:span><text:span text:style-name="T2">(91/1) </text:span> ⲉϣⲁⲩⲙⲟⲩⲧⲉ ⲉⲣⲟϥ ϫⲉ ⲙⲁⲛⲧⲏ <text:line-break/><text:span text:style-name="T1"> </text:span><text:span text:style-name="T2">(91/2) </text:span> ϩⲓ ⲣⲁϣⲉ ⲛ̅ⲧⲉⲣⲟⲩⲥⲱⲟⲩϩ ϩⲓⲟⲩ‐ <text:line-break/><text:span text:style-name="T1"> </text:span><text:span text:style-name="T2">(91/3) </text:span> ⲥⲟⲡ%6 ⲉⲩⲁⲡⲟⲣⲓ ⲉⲧⲃⲉ ⲧϩⲩⲡⲟⲥⲧⲁ‐ <text:line-break/><text:span text:style-name="T1"> </text:span><text:span text:style-name="T2">(91/4) </text:span> ⲥⲓⲥ ⲙ̅ⲡⲧⲏⲣϥ· ⲙⲛ̅ ⲧⲟⲓⲕⲟⲛⲟⲙⲓⲁ <text:line-break/><text:span text:style-name="T1"> </text:span><text:span text:style-name="T2">(91/5) </text:span> ⲙⲛ̅ ⲧⲉⲡⲣⲟⲛⲟⲓⲁ ⲉⲧⲟⲩⲁⲁⲃ· ⲙⲛ̅ <text:line-break/><text:span text:style-name="T1"> </text:span><text:span text:style-name="T2">(91/6) </text:span> ⲧⲁⲣⲉⲧⲏ ⲛ̅ⲛⲉⲝ̓ⲟⲩⲥⲓⲁ ⲁⲩⲱ ⲉⲧⲃⲉ <text:line-break/><text:span text:style-name="T1"> </text:span><text:span text:style-name="T2">(91/7) </text:span> ϩⲱⲃ ⲛⲓⲙ ⲉⲧⲉⲣⲉⲡⲥⲱⲧⲏⲣ ⲉⲓⲣⲉ <text:line-break/><text:span text:style-name="T1"> </text:span><text:span text:style-name="T2">(91/8) </text:span> ⲙ̅ⲙⲟⲟⲩ ⲛⲙ̅ⲙⲁⲩ ϩⲙ̅ ⲡⲙⲩⲥⲧⲏ‐ <text:line-break/><text:span text:style-name="T1"> </text:span><text:span text:style-name="T2">(91/9) </text:span> ⲣⲓⲟⲛ ⲛ̅ⲧⲟⲓⲕⲟⲛⲟⲙⲓⲁ ⲉⲧⲟⲩⲁⲁⲃ̓ <text:line-break/><text:span text:style-name="T1"> </text:span><text:span text:style-name="T2">(91/10) </text:span> ⲁϥⲟⲩⲱⲛϩ ⲛ̅ϭⲓ ⲡⲥⲱⲧⲏⲣ ϩⲛ̅ ⲧⲉϥ‐ <text:line-break/><text:span text:style-name="T1"> </text:span><text:span text:style-name="T2">(91/11) </text:span> ϣⲟⲣⲡ%6 →ⲉⲛ← ⲙ̅ⲙⲟⲣⲫⲏ ⲁⲗⲗⲁ ϩⲙ̅ ⲡⲉ‐ <text:line-break/><text:span text:style-name="T1"> </text:span><text:span text:style-name="T2">(91/12) </text:span> ⲡ̅ⲛ̅ⲁ̅ ⲛ̅ⲁϩⲟⲣⲁⲧⲟⲛ· ⲡⲉϥⲉⲓⲛⲉ ⲇⲉ <text:line-break/><text:span text:style-name="T1"> </text:span><text:span text:style-name="T2">(91/13) </text:span> ⲛ̅ⲑⲉ ⲛ̅ⲟⲩⲛⲟϭ ⲛ̅ⲁⲅ%6ⲅⲉⲗⲟⲥ ⲛ̅ⲧⲉ ⲡⲟⲩ‐ <text:line-break/><text:span text:style-name="T1"> </text:span><text:span text:style-name="T2">(91/14) </text:span> ⲟⲉⲓⲛ ⲡⲉϥⲥⲙⲟⲧ%6 ⲇⲉ ⲛ̅ⲛⲁϣ ϣⲁ‐ <text:line-break/><text:span text:style-name="T1"> </text:span><text:span text:style-name="T2">(91/15) </text:span> ϫⲉ ⲥⲣⲟϥ ⲛ̅ⲛⲉϣ ⲥⲁⲣⲝ ⲛⲓⲙ ⲉϣⲁ〈ⲥ〉 <text:line-break/><text:span text:style-name="T1"> </text:span><text:span text:style-name="T2">(91/16) </text:span> ⲙⲟⲩ ϣⲟⲡϥ̅ ⲉⲣⲟⲥ ⲁⲗⲗⲁ ⲟⲩⲥⲁⲣⲝ <text:line-break/><text:span text:style-name="T1"> </text:span><text:span text:style-name="T2">(91/17) </text:span> ⲛ̅ⲕⲁⲑⲁⲣⲟⲛ ⲛ̅ⲧⲉⲗⲉⲓⲟⲛ ⲛ̅ⲑⲉ <text:line-break/><text:span text:style-name="T1"> </text:span><text:span text:style-name="T2">(91/18) </text:span> ⲛ̅ⲧⲁϥⲧⲥⲁⲃⲟⲛ ⲉⲣⲟϥ ϩⲓϫⲙ̅ ⲡⲧⲟ‐ <text:line-break/><text:span text:style-name="T1"> </text:span><text:span text:style-name="T2">(91/19) </text:span> ⲟⲩ ⲉϣⲁⲩⲙⲟⲩⲧⲉ ⲉⲣⲟϥ ϫⲉ <text:line-break/><text:span text:style-name="T1"> </text:span><text:span text:style-name="T2">(91/20) </text:span> ⲡⲁ ⲛ̅ϫⲟⲉⲓⲧ%6 ϩⲛ̅ ⲧⲅⲁⲗⲓⲗⲁⲓⲁ· ⲁⲩⲱ <text:line-break/><text:span text:style-name="T1"> </text:span><text:span text:style-name="T2">(91/21) </text:span> ⲡⲉϫⲁϥ ϫⲉ ϯⲣⲏⲛⲏ ⲛⲏⲧⲛ̅ ϯ‐ <text:line-break/><text:span text:style-name="T1"> </text:span><text:span text:style-name="T2">(91/22) </text:span> ⲣⲏⲛⲏ ⲉⲧⲉ ⲧⲱⲉⲓ ⲧⲉ ϯϯ ⲙ̅ⲙⲟⲥ <text:line-break/><text:span text:style-name="T1"> </text:span><text:span text:style-name="T2">(91/23) </text:span> ⲛⲏⲧⲛ̅ ⲁⲩⲣ̅ ϣⲡⲏⲣⲉ ⲧⲏⲣⲟⲩ· <text:line-break/><text:span text:style-name="T1"> </text:span><text:span text:style-name="T2">(91/24) </text:span> ⲁⲩⲱ ⲁⲩⲣ̅ ϩⲟⲧⲉ· ⲡⲥⲱⲧⲏⲣ· ⲁϥ <text:line-break/><text:span text:style-name="T1"> </text:span><text:span text:style-name="T2">(92/1) </text:span> ⲥⲱⲃⲉ ⲡⲉϫⲁϥ ⲛⲁⲩ ϫⲉ ⲉⲧⲃⲉ ⲟⲩ <text:line-break/><text:span text:style-name="T1"> </text:span><text:span text:style-name="T2">(92/2) </text:span> ⲧⲉⲧⲛ̅ⲙⲉⲟⲩⲉ ⲧⲉⲧⲛ̅ⲁⲡⲟⲣⲉⲓ· <text:line-break/><text:span text:style-name="T1"> </text:span><text:span text:style-name="T2">(92/3) </text:span> ⲉⲧⲉⲧⲛ̅ϣⲓⲛⲉ ⲛ̅ⲥⲁ ⲟⲩ ⲡⲉϫⲉ <text:line-break/><text:span text:style-name="T1"> </text:span><text:span text:style-name="T2">(92/4) </text:span> ⲫⲓⲗⲓⲡ%6ⲡⲟⲥ ϫⲉ ⲉⲧⲃⲉ ⲑⲩⲡⲟ‐ <text:line-break/><text:span text:style-name="T1"> </text:span><text:span text:style-name="T2">(92/5) </text:span> ⲥⲧⲁⲥⲓⲥ ⲙ̅ⲡⲧⲏⲣϥ̅· ⲙⲛ̅ ⲧⲟⲓⲕⲟ‐ <text:line-break/><text:span text:style-name="T1"> </text:span><text:span text:style-name="T2">(92/6) </text:span> ⲛⲟⲙⲓⲁ· ⲡⲥⲱⲧⲏⲣ ⲡⲉϫⲁϥ ⲛⲁⲩ <text:line-break/><text:span text:style-name="T1"> </text:span><text:span text:style-name="T2">(92/7) </text:span> ϫⲉ ϯⲟⲩⲱϣ ⲉⲧⲣⲉⲧⲛ̅ⲉⲓⲙⲉ <text:line-break/><text:span text:style-name="T1"> </text:span><text:span text:style-name="T2">(92/8) </text:span> ϫⲉ ⲛ̅ⲣⲱⲙⲉ ⲧⲏⲣⲟⲩ ⲛ̅ⲧⲁⲩϫⲡⲟ‐ <text:line-break/><text:span text:style-name="T1"> </text:span><text:span text:style-name="T2">(92/9) </text:span> ⲟⲩ ⲉⲡⲕⲁϩ· ϫⲓⲛ ⲧⲕⲁⲧⲁⲃⲟⲗⲏ ⲙ̅‐ <text:line-break/><text:span text:style-name="T1"> </text:span><text:span text:style-name="T2">(92/10) </text:span> ⲡⲕⲟⲥⲙⲟⲥ ϣⲁ ⲧⲉⲛⲟⲩ ⲉⲩⲟ <text:line-break/><text:span text:style-name="T1"> </text:span><text:span text:style-name="T2">(92/11) </text:span> ⲛ̅ϣϩⲓϭ ⲉⲩϣⲓⲛⲉ ⲛ̅ⲥⲁ ⲡⲛⲟⲩ‐ <text:line-break/><text:span text:style-name="T1"> </text:span><text:span text:style-name="T2">(92/12) </text:span> ⲧⲉ ϫⲉ ⲛⲓⲙ ⲡⲉ ⲁⲩⲱ ⲟⲩⲁϣ ⲙ̅‐ <text:line-break/><text:span text:style-name="T1"> </text:span><text:span text:style-name="T2">(92/13) </text:span> ⲙⲓⲛⲉ ⲡⲉ ⲙ̅ⲡⲟⲩϩⲉ ⲉⲣⲟϥ ⲛ̅‐ <text:line-break/><text:span text:style-name="T1"> </text:span><text:span text:style-name="T2">(92/14) </text:span> ⲥⲁⲃⲉⲉⲩⲉ ⲇⲉ ⲛ̅ϩⲟⲩⲟ ⲉⲧⲛ̅ϩⲏ‐ <text:line-break/><text:span text:style-name="T1"> </text:span><text:span text:style-name="T2">(92/15) </text:span> ⲧⲟⲩ ⲉⲃⲟⲗ ϩⲛ̅ ⲧⲇⲓⲟⲓⲕⲏⲥⲓⲥ ⲙ̅‐ <text:line-break/><text:span text:style-name="T1"> </text:span><text:span text:style-name="T2">(92/16) </text:span> ⲡⲕⲟⲥⲙⲟⲥ ⲙⲛ̅ ⲡⲕⲓⲙ ⲁⲩϯ <text:line-break/><text:span text:style-name="T1"> </text:span><text:span text:style-name="T2">(92/17) </text:span> ⲧⲁⲛⲧⲛ̅ ⲙ̅ⲡⲉⲡⲉⲩⲧⲁⲛⲧⲛ̅ ⲇⲉ ⲧⲁ‐ <text:line-break/><text:soft-page-break/><text:span text:style-name="T1"> </text:span><text:span text:style-name="T2">(92/18) </text:span> ϩⲉ ⲧⲙⲏⲉ· ⲧⲇⲓⲟⲓⲕⲏⲥⲓⲥ ⲅⲁⲣ ϣⲁⲩ‐ <text:line-break/><text:span text:style-name="T1"> </text:span><text:span text:style-name="T2">(92/19) </text:span> ϣⲁϫⲉ ⲉⲣⲟⲥ ⲛ̅ϣⲟⲙⲛ̅ⲧ ⲛ̅ϩⲉ <text:line-break/><text:span text:style-name="T1"> </text:span><text:span text:style-name="T2">(92/20) </text:span> ⲉⲩⲁⲅⲉ ⲙ̅ⲙⲟⲥ ϩⲓⲧⲛ̅ ⲛⲉⲫⲓⲗⲟ‐ <text:line-break/><text:span text:style-name="T1"> </text:span><text:span text:style-name="T2">(92/21) </text:span> ⲥⲟⲫⲟⲥ ⲧⲏⲣⲟⲩ· ⲉⲧⲃⲉ ⲡⲁⲓ̈ ⲛ̅ⲥⲉ‐ <text:line-break/><text:span text:style-name="T1"> </text:span><text:span text:style-name="T2">(92/22) </text:span> ⲥⲩⲙⲫⲱⲛⲉⲓ ⲁⲛ· ϩⲟⲉⲓⲛ ⲅⲁⲣ ⲛ̅‐ <text:line-break/><text:span text:style-name="T1"> </text:span><text:span text:style-name="T2">(92/23) </text:span> ϩⲏⲧⲟⲩ ⲥⲉϫⲱ ⲙ̅ⲙⲟⲥ ⲉⲡⲕⲟ‐ <text:line-break/><text:span text:style-name="T1"> </text:span><text:span text:style-name="T2">(92/24) </text:span> ⲥⲙⲟⲥ ϫⲉ ⲉⲩⲁⲅⲉ ⲙ̅ⲙⲟϥ ϩⲓⲧⲟ‐ <text:line-break/><text:span text:style-name="T1"> </text:span><text:span text:style-name="T2">(93/1) </text:span> ⲟⲧϥ̅ ⲙ̅ⲙⲓⲛ ⲙ̅ⲙⲟϥ ϩⲉⲛⲕⲟⲟⲩ̣[ⲉ] <text:line-break/><text:span text:style-name="T1"> </text:span><text:span text:style-name="T2">(93/2) </text:span> ⲇⲉ ϫⲉ ⲟⲩⲡⲣⲟⲛⲟⲓⲁ ⲧⲉ· ϩⲉⲛⲕⲟ‐ <text:line-break/><text:span text:style-name="T1"> </text:span><text:span text:style-name="T2">(93/3) </text:span> ⲟⲩⲉ ⲇⲉ ϫⲉ ⲟⲩⲡⲉⲧⲏⲡ%6 ⲉϣⲱⲡⲉ <text:line-break/><text:span text:style-name="T1"> </text:span><text:span text:style-name="T2">(93/4) </text:span> ⲡⲉ ⲁⲩⲱ ⲛ̅ⲟⲩⲟⲛ ⲛ̅ⲛⲁⲓ̈ ⲁⲛ ⲛⲉ <text:line-break/><text:span text:style-name="T1"> </text:span><text:span text:style-name="T2">(93/5) </text:span> ⲧϣⲟⲙⲧⲉ ϭⲉ ⲛ̅ⲥⲙⲏ ⲛ̅ⲧⲁⲉⲓⲣ̅ <text:line-break/><text:span text:style-name="T1"> </text:span><text:span text:style-name="T2">(93/6) </text:span> ϣⲣ̅ⲡ%6 ⲛ̅ϫⲟⲟⲩ ⲙ̅ⲙⲛ̅ ⲟⲩⲉⲓ ⲙ̅‐ <text:line-break/><text:span text:style-name="T1"> </text:span><text:span text:style-name="T2">(93/7) </text:span> ⲙⲟⲟⲩ ϩⲏⲛ ⲉⲧⲙⲏⲉ ⲏ͂ ⲉⲃⲟⲗ ϩⲓ‐ <text:line-break/><text:span text:style-name="T1"> </text:span><text:span text:style-name="T2">(93/8) </text:span> ⲧⲛ̅ ⲣⲱⲙⲉ· ⲁⲛⲟⲕ ⲇⲉ ⲛ̅ⲧⲁⲉⲓ{ⲉ̅ⲓ} ⲉ‐ <text:line-break/><text:span text:style-name="T1"> </text:span><text:span text:style-name="T2">(93/9) </text:span> ⲃⲟⲗ ϩⲙ̅ ⲡⲟⲩⲟⲉⲓⲛ ⲛ̅ⲁⲡⲉⲣⲁⲛⲧⲟⲛ <text:line-break/><text:span text:style-name="T1"> </text:span><text:span text:style-name="T2">(93/10) </text:span> ϯ ⲙ̅ⲡⲉⲉⲓⲙⲁ· ⲁⲛⲟⲕ ⲅⲁⲣ ϯⲥⲟⲟⲩⲛ <text:line-break/><text:span text:style-name="T1"> </text:span><text:span text:style-name="T2">(93/11) </text:span> ⲙ̅ⲙⲟϥ ϫⲉ ⲉⲉⲓⲉϫⲱ ⲛ̅ⲏⲧⲛ̅ ⲛ̅ⲧⲁ‐ <text:line-break/><text:span text:style-name="T1"> </text:span><text:span text:style-name="T2">(93/12) </text:span> ⲕⲣⲓⲃⲓⲁ ⲛ̅ⲧⲙⲏⲉ· ⲡⲉⲧⲉ ⲟⲩⲉⲃⲟⲗ <text:line-break/><text:span text:style-name="T1"> </text:span><text:span text:style-name="T2">(93/13) </text:span> ϩⲓⲧⲟⲟⲧϥ̅ ⲙ̅ⲙⲓⲛ ⲙ̅ⲙⲟϥ ⲟⲩⲃⲓⲟⲥ <text:line-break/><text:span text:style-name="T1"> </text:span><text:span text:style-name="T2">(93/14) </text:span> ⲉϥⲥⲟⲟϥ ⲡⲉⲧⲉϣⲁϥⲁⲁϥ· ⲧⲉⲡⲣⲟ‐ <text:line-break/><text:span text:style-name="T1"> </text:span><text:span text:style-name="T2">(93/15) </text:span> ⲛⲟⲓⲁ ⲙⲛ̅ ⲙⲛ̅ⲧⲥⲁⲃⲏ ⲛ̅ϩⲏⲧⲥ̅ ⲧⲉ‐ <text:line-break/><text:span text:style-name="T1"> </text:span><text:span text:style-name="T2">(93/16) </text:span> ⲧϩⲁⲛⲧ%6 ⲇⲉ ⲙⲉⲥⲉⲥⲑⲁⲛⲉ· ⲛ̅ⲧⲱ‐ <text:line-break/><text:span text:style-name="T1"> </text:span><text:span text:style-name="T2">(93/17) </text:span> ⲧⲛ̅ ϭⲉ ⲛⲉⲧⲥ̅ⲧⲟ ⲛⲏⲧⲛ ⲉⲥⲟⲟⲩⲛ <text:line-break/><text:span text:style-name="T1"> </text:span><text:span text:style-name="T2">(93/18) </text:span> ⲁⲩⲱ ⲛⲉⲧⲙ̅ⲡϣⲁ ⲙ̅ⲡⲥⲟⲟⲩⲛ <text:line-break/><text:span text:style-name="T1"> </text:span><text:span text:style-name="T2">(93/19) </text:span> ⲥⲉⲛⲁϯ ⲛⲁⲩ ⲛ̅ⲛⲏ ⲉⲧⲉ ⲙ̅ⲡⲟⲩ‐ <text:line-break/><text:span text:style-name="T1"> </text:span><text:span text:style-name="T2">(93/20) </text:span> ϫⲡⲟⲟⲩ ⲉⲃⲟⲗ ϩⲛ̅ ⲧⲉⲥⲡⲟⲣⲁ ⲛ̅ⲧⲉ‐ <text:line-break/><text:span text:style-name="T1"> </text:span><text:span text:style-name="T2">(93/21) </text:span> ⲧⲣⲓⲃⲏ ⲉⲧϫⲁϩⲙ̅· ⲁⲗⲗⲁ ϩⲙ̅ ⲡⲉϩⲟⲩ‐ <text:line-break/><text:span text:style-name="T1"> </text:span><text:span text:style-name="T2">(93/22) </text:span> ⲉⲓⲧ%6 ⲉ〈ⲧ〉ⲁⲩⲧⲛ̅ⲛⲟⲟⲩϥ· ϫⲉ ⲡⲁⲓ̈ ⲅⲁⲣ <text:line-break/><text:span text:style-name="T1"> </text:span><text:span text:style-name="T2">(93/23) </text:span> ⲟⲩⲁⲑⲁⲛⲁⲧⲟⲥ ⲡⲉ ϩⲛ̅ ⲧⲙⲏⲧⲉ ⲛ̅‐ <text:line-break/><text:span text:style-name="T1"> </text:span><text:span text:style-name="T2">(93/24) </text:span> ⲣ̅ⲣⲱⲙⲉ ⲉⲧⲉϣⲁⲩⲙⲟⲩ· ⲡⲉϫⲁϥ· <text:line-break/><text:span text:style-name="T1"> </text:span><text:span text:style-name="T2">(94/1) </text:span> ⲛⲁϥ ⲛ̅ϭⲓ ⲙⲁⲑ%6ⲑⲁⲓⲟⲥ ϫⲉ ⲡϫⲟⲉⲓⲥ <text:line-break/><text:span text:style-name="T1"> </text:span><text:span text:style-name="T2">(94/2) </text:span> ⲙ̅ⲙⲛ̅ⲗⲁⲁⲩ ⲛⲁϣ ϭⲛ ⲧⲙⲏⲉ· ⲉⲓ‐ <text:line-break/><text:span text:style-name="T1"> </text:span><text:span text:style-name="T2">(94/3) </text:span> ⲙⲏⲧⲓ ⲉⲃⲟⲗ ϩⲓⲧⲟⲟⲧⲕ%3 ⲙⲁⲧⲁⲙⲟⲛ <text:line-break/><text:span text:style-name="T1"> </text:span><text:span text:style-name="T2">(94/4) </text:span> ϭⲉ ⲉⲧⲙⲏⲉ· ⲡⲥⲱⲧⲏⲣ ⲡⲉϫⲁϥ ϫⲉ <text:line-break/><text:span text:style-name="T1"> </text:span><text:span text:style-name="T2">(94/5) </text:span> ⲡⲉⲧϣⲟⲟⲡ%6 ⲟⲩⲁⲧϣⲁϫⲉ ⲉⲣⲟϥ ⲡⲉ <text:line-break/><text:span text:style-name="T1"> </text:span><text:span text:style-name="T2">(94/6) </text:span> ⲙ̅ⲡⲉⲁⲣⲭⲏ ⲥⲟⲩⲱⲛϥ ⲙ̅ⲡⲉⲉⲝⲟⲩ‐ <text:line-break/><text:span text:style-name="T1"> </text:span><text:span text:style-name="T2">(94/7) </text:span> ⲥⲓⲁ ⲙ̅ⲡⲉϩⲩⲡⲟⲧⲁⲅⲏ ⲙ̅ⲡⲉⲫⲩ‐ <text:line-break/><text:span text:style-name="T1"> </text:span><text:span text:style-name="T2">(94/8) </text:span> ⲥⲓⲥ ⲛⲓⲙ ϫⲓⲛ ⲛ̅ⲧⲕⲁⲧⲁⲃⲟⲗⲏ ⲙ̅‐ <text:line-break/><text:span text:style-name="T1"> </text:span><text:span text:style-name="T2">(94/9) </text:span> ⲡⲕⲟⲥⲙⲟⲥ ϣⲁ ⲧⲉⲛⲟⲩ ⲉⲓⲙⲏⲧⲓ <text:line-break/><text:span text:style-name="T1"> </text:span><text:span text:style-name="T2">(94/10) </text:span> ⲛ̅ⲧⲟϥ ⲟⲩⲁⲁⲧϥ̅· ⲙⲛ̅ ⲡⲉⲧⲉϩⲛⲁϥ <text:line-break/><text:span text:style-name="T1"> </text:span><text:span text:style-name="T2">(94/11) </text:span> ⲉϭⲱⲗⲡ%6 ⲛⲁϥ ⲉⲃⲟⲗ ϩⲓⲧⲟⲟⲧϥ̅· <text:line-break/><text:span text:style-name="T1"> </text:span><text:span text:style-name="T2">(94/12) </text:span> ⲡⲁⲓ̈ ⲉⲧⲉ ⲟⲩⲉⲃⲟⲗ ϩⲙ̅ ⲡⲉϩⲟⲩ‐ <text:line-break/><text:span text:style-name="T1"> </text:span><text:span text:style-name="T2">(94/13) </text:span> ⲉⲓⲧ%3 ⲛ̅ⲟⲩⲟⲉⲓⲛ· ϫⲓⲛ ⲛ̅ⲧⲉⲛⲟⲩ <text:line-break/><text:span text:style-name="T1"> </text:span><text:span text:style-name="T2">(94/14) </text:span> ⲁⲛⲟⲕ ⲡⲛⲟϭ ⲛ̅ⲥⲱⲧⲏⲣ· ⲡⲉⲧⲙ̅‐ <text:line-break/><text:span text:style-name="T1"> </text:span><text:span text:style-name="T2">(94/15) </text:span> ⲙⲁⲩ ⲅⲁⲣ ⲟⲩⲁⲧ%6ⲙⲟⲩ ⲡⲉ ⲟⲩϣⲁ <text:line-break/><text:span text:style-name="T1"> </text:span><text:span text:style-name="T2">(94/16) </text:span> ⲉⲛⲉϩ ⲡⲉ· ⲟⲩϣⲁ ⲉⲛⲉϩ ⲇⲉ ⲡⲉ <text:line-break/><text:soft-page-break/><text:span text:style-name="T1"> </text:span><text:span text:style-name="T2">(94/17) </text:span> ⲉⲙⲛ̅ⲧⲁϥ ϫⲡⲟ ⲟⲩⲟⲛ ⲅⲁⲣ ⲛⲓⲙ ⲉ‐ <text:line-break/><text:span text:style-name="T1"> </text:span><text:span text:style-name="T2">(94/18) </text:span> ⲧⲉ ⲟⲩⲛⲧⲁϥ ϫⲡⲟ ϥⲛⲁⲧⲁⲕⲟ· ⲟⲩ‐ <text:line-break/><text:span text:style-name="T1"> </text:span><text:span text:style-name="T2">(94/19) </text:span> ⲁⲅⲉⲛⲛⲏⲧⲟⲥ ⲡⲉ ⲉⲙⲛ̅ⲧϥ̅ ⲁⲣⲭⲏ <text:line-break/><text:span text:style-name="T1"> </text:span><text:span text:style-name="T2">(94/20) </text:span> ⲟⲩⲟⲛ ⲅⲁⲣ ⲛⲓⲙ ⲉⲧⲉ ⲟⲩⲛⲧⲁϥ ⲁⲣ‐ <text:line-break/><text:span text:style-name="T1"> </text:span><text:span text:style-name="T2">(94/21) </text:span> ⲭⲏ ⲟⲩⲛ̅ⲧⲁϥ ϩⲁⲏ· ⲉⲙⲛ̅ ⲗⲁⲁⲩ ⲁⲣ‐ <text:line-break/><text:span text:style-name="T1"> </text:span><text:span text:style-name="T2">(94/22) </text:span> ⲭⲓ ⲉϫⲱϥ ⲉⲙⲛ̅ⲧⲁϥ ⲣⲁⲛ ⲡⲉⲧⲉ <text:line-break/><text:span text:style-name="T1"> </text:span><text:span text:style-name="T2">(94/23) </text:span> ⲟⲩⲛⲧⲁϥ ⲣⲁⲛ ⲅⲁⲣ ⲡⲥⲱⲛⲧ%6 ⲛ̅‐ <text:line-break/><text:span text:style-name="T1"> </text:span><text:span text:style-name="T2">(94/24) </text:span> ⲕⲉⲟⲩⲁ ⲡⲉ· ⲟⲩⲛⲧⲁϥ ⲇⲉ ⲛ̅ⲟⲩϩⲓ‐ <text:line-break/><text:span text:style-name="T1"> </text:span><text:span text:style-name="T2">(95/1) </text:span> ⲇⲉⲁ ⲉ̣ⲧ̣[ⲱ]ϥ̣ ⲙ̅ⲙⲓⲛ ⲙ̅ⲙⲟϥ ⲧⲉ ⲛ̅‐ <text:line-break/><text:span text:style-name="T1"> </text:span><text:span text:style-name="T2">(95/2) </text:span> ⲑⲉ ⲛ̣̅[ⲧⲁⲧ]ⲉⲧⲛ̅ⲛⲁⲩ ⲉⲣⲟⲥ →ⲁⲛ← ⲏ͂ ⲛ̅ⲑⲉ <text:line-break/><text:span text:style-name="T1"> </text:span><text:span text:style-name="T2">(95/3) </text:span> ⲛ̅ⲧⲁⲧⲉⲧⲛ̅ϫⲓⲧⲥ̅· ⲁⲗⲗⲁ ⲟⲩϩⲓⲇⲉⲁ <text:line-break/><text:span text:style-name="T1"> </text:span><text:span text:style-name="T2">(95/4) </text:span> ⲛ̅ϣⲙ̅ⲙⲱ ⲧⲉ ⲉⲥⲟⲩⲁⲧⲃ̅ ⲉⲛⲕⲁ <text:line-break/><text:span text:style-name="T1"> </text:span><text:span text:style-name="T2">(95/5) </text:span> ⲛⲓⲙ ⲁⲩⲱ ⲉⲥⲥⲟⲧⲡ%6 ⲉⲡⲧⲏⲣϥ· ⲉ‐ <text:line-break/><text:span text:style-name="T1"> </text:span><text:span text:style-name="T2">(95/6) </text:span> ⲥⲛⲁⲩ ϩⲓ ⲥ{ⲉ}→ⲁ← ⲛⲓⲙ· ⲉⲥⲉⲓⲱⲣϩ ⲙ̅ⲙⲟⲥ <text:line-break/><text:span text:style-name="T1"> </text:span><text:span text:style-name="T2">(95/7) </text:span> ϩⲓⲧⲟⲟⲧⲥ̅ ⲟⲩⲁⲁⲧⲥ̅ ⲉⲙⲛ̅ ⲁⲣⲏϫⲥ̅ <text:line-break/><text:span text:style-name="T1"> </text:span><text:span text:style-name="T2">(95/8) </text:span> ⲟⲩⲁⲧʹ266ⲁϩⲟϥ ⲡⲉ ⲉϥⲙⲏⲛ ⲉⲃⲟⲗ· <text:line-break/><text:span text:style-name="T1"> </text:span><text:span text:style-name="T2">(95/9) </text:span> ⲟⲩⲁⲫⲑⲁⲣⲧⲟⲥ ⲡⲉ ⲉⲙⲛ̅ⲧⲁϥ ⲡⲉϥⲉⲓ‐ <text:line-break/><text:span text:style-name="T1"> </text:span><text:span text:style-name="T2">(95/10) </text:span> ⲛⲉ ⲟⲩⲁⲅⲁⲑⲟⲥ ⲡⲉ ⲉⲙⲉϥϣⲓⲃⲉ <text:line-break/><text:span text:style-name="T1"> </text:span><text:span text:style-name="T2">(95/11) </text:span> ⲟⲩⲁⲧϣⲱⲱⲧ%6 ⲡⲉ ⲟⲩϣⲁ ⲁⲛⲏϩⲉ <text:line-break/><text:span text:style-name="T1"> </text:span><text:span text:style-name="T2">(95/12) </text:span> ⲡⲉ ⲟⲩⲙⲁⲕⲁⲣⲓⲟⲥ ⲡⲉ ⲉⲙⲉⲩⲛⲟ‐ <text:line-break/><text:span text:style-name="T1"> </text:span><text:span text:style-name="T2">(95/13) </text:span> ⲉⲓⲉ ⲙ̅ⲙⲟϥ ϣⲁϥⲛⲟⲉⲓⲉ ⲙ̅ⲙⲟϥ <text:line-break/><text:span text:style-name="T1"> </text:span><text:span text:style-name="T2">(95/14) </text:span> ⲟⲩⲁⲁⲧϥ̅ ⲟⲩⲁⲧϣⲓⲧϥ̅ ⲡⲉ ⲟⲩⲁⲧ%6‐ <text:line-break/><text:span text:style-name="T1"> </text:span><text:span text:style-name="T2">(95/15) </text:span> ϫⲓ ϭⲉϫⲙⲉ ⲛ̅ⲥⲱϥ ⲡⲉ· ⲟⲩⲧⲉⲗⲓⲟⲥ <text:line-break/><text:span text:style-name="T1"> </text:span><text:span text:style-name="T2">(95/16) </text:span> ⲡⲉ ⲉⲙⲛ̅ⲧⲁϥ ϣⲱⲱⲧ%6 ⲟⲩⲙⲁⲕⲁ‐ <text:line-break/><text:span text:style-name="T1"> </text:span><text:span text:style-name="T2">(95/17) </text:span> ⲣⲓⲟⲥ ⲡⲉ ⲛ̅ⲁⲫⲑⲁⲣⲧⲟⲥ ϣⲁⲩⲙⲟⲩ‐ <text:line-break/><text:span text:style-name="T1"> </text:span><text:span text:style-name="T2">(95/18) </text:span> ⲧⲉ ⲉⲣⲟϥ ϫⲉ ⲡⲉⲓⲱⲧ%3 ⲙ̅ⲡⲧⲏⲣϥ̅· <text:line-break/><text:span text:style-name="T1"> </text:span><text:span text:style-name="T2">(95/19) </text:span> ⲫⲓⲗⲓⲡ%6ⲡⲟⲥ ⲡⲉϫⲁϥ ϫⲉ ⲡϫⲟⲉⲓⲥ <text:line-break/><text:span text:style-name="T1"> </text:span><text:span text:style-name="T2">(95/20) </text:span> ⲡⲱⲥ ϭⲉ ⲁϥⲟⲩⲱⲛϩ ⲉⲛⲧⲉⲗⲓⲟⲥ <text:line-break/><text:span text:style-name="T1"> </text:span><text:span text:style-name="T2">(95/21) </text:span> ⲡⲉϫⲁϥ ⲛⲁϥ ⲛ̅ϭⲓ ⲡⲧⲉⲗⲓⲟⲥ ⲛ̅ⲥⲱ‐ <text:line-break/><text:span text:style-name="T1"> </text:span><text:span text:style-name="T2">(95/22) </text:span> ⲧⲏⲣ ϫⲉ ϩⲁⲑⲏ ⲛ̅ⲥⲉⲟⲩ〈ⲱ〉ⲛϩ̅ ⲗⲁⲁⲩ <text:line-break/><text:span text:style-name="T1"> </text:span><text:span text:style-name="T2">(95/23) </text:span> ⲉⲃⲟⲗ ⲛ̅ⲧⲉ ⲛⲉⲧⲟⲩⲁⲛϩ ⲉⲃⲟⲗ ⲧⲙⲛ̅‐ <text:line-break/><text:span text:style-name="T1"> </text:span><text:span text:style-name="T2">(95/24) </text:span> ⲧⲛⲟϭ ⲙⲛ̅ ⲧⲉⲝⲟⲩⲥⲓⲁ ⲉⲩϣⲟⲟⲡ%3 <text:line-break/><text:span text:style-name="T1"> </text:span><text:span text:style-name="T2">(96/1) </text:span> ⲛ̅ϩⲏⲧϥ̅ ⲉϥⲉⲙⲁϩⲧⲉ [ⲙ̅ⲡϩⲟ]ⲗⲱⲛ <text:line-break/><text:span text:style-name="T1"> </text:span><text:span text:style-name="T2">(96/2) </text:span> ⲛ̅〈ⲛ〉ⲓⲡⲧⲏⲣϥ ⲉⲙⲛ̅ ⲗⲁⲁⲩ ⲉ̣ⲙ̣[ⲁ]ϩⲧⲉ <text:line-break/><text:span text:style-name="T1"> </text:span><text:span text:style-name="T2">(96/3) </text:span> ⲙ̅ⲙⲟϥ· ⲡⲉⲧⲙ̅ⲙⲁⲩ ⲅⲁⲣ ⲟⲩ‐ <text:line-break/><text:span text:style-name="T1"> </text:span><text:span text:style-name="T2">(96/4) </text:span> ⲛⲟⲩⲥ ⲧⲏⲣϥ ⲡⲉ ⲁⲩⲱ ⲟⲩⲉⲛ‐ <text:line-break/><text:span text:style-name="T1"> </text:span><text:span text:style-name="T2">(96/5) </text:span> ⲛⲟⲓⲁ ⲡⲉ ⲙⲛ̅ ⲟⲩⲫⲣⲟⲛⲏⲥⲓⲥ <text:line-break/><text:span text:style-name="T1"> </text:span><text:span text:style-name="T2">(96/6) </text:span> ⲙⲛ̅ ⲟⲩⲉⲛⲑⲩⲙⲏⲥⲓⲥ ⲙⲛ̅ ⲟⲩ‐ <text:line-break/><text:span text:style-name="T1"> </text:span><text:span text:style-name="T2">(96/7) </text:span> ⲗⲟⲅⲓⲥⲙⲟⲥ ⲙⲛ̅ ⲟⲩϭⲟⲙ· ⲛ̅ⲧⲟ‐ <text:line-break/><text:span text:style-name="T1"> </text:span><text:span text:style-name="T2">(96/8) </text:span> ⲟⲩ ⲧⲏⲣⲟⲩ ϩⲉⲛϩⲓⲥⲟⲛ ⲛ̅ⲇⲩ‐ <text:line-break/><text:span text:style-name="T1"> </text:span><text:span text:style-name="T2">(96/9) </text:span> ⲛⲁⲙⲓⲥ ⲛⲉ· ⲙ̅ⲡⲏⲅⲏ ⲛ̅ⲛⲓⲡⲧⲏⲣϥ <text:line-break/><text:span text:style-name="T1"> </text:span><text:span text:style-name="T2">(96/10) </text:span> ⲛⲉ· ⲁⲩⲱ ⲡⲉⲩⲅⲉⲛⲟⲥ ⲧⲏⲣϥ ϫⲓⲛ <text:line-break/><text:span text:style-name="T1"> </text:span><text:span text:style-name="T2">(96/11) </text:span> ⲛ̅ϣⲟⲣⲡ%6 ϣⲁ ⲁⲣⲏϫⲛⲟⲩ ⲛⲉⲩ‐ <text:line-break/><text:span text:style-name="T1"> </text:span><text:span text:style-name="T2">(96/12) </text:span> ϩⲛ̅ ⲡⲉϥϣⲣ̅ⲡ ⲛ̅ⲥⲟⲟⲩⲛ ⲡⲓⲁ‐ <text:line-break/><text:span text:style-name="T1"> </text:span><text:span text:style-name="T2">(96/13) </text:span> ⲡⲉⲣⲁⲛⲧⲟⲥ ⲛ̅ⲁⲅⲉⲛⲛⲏⲧⲟⲥ <text:line-break/><text:span text:style-name="T1"> </text:span><text:span text:style-name="T2">(96/14) </text:span> ⲛ̅ⲉⲓⲱⲧ%6· ⲑⲱⲙⲁⲥ ⲡⲉϫⲁϥ <text:line-break/><text:span text:style-name="T1"> </text:span><text:span text:style-name="T2">(96/15) </text:span> ⲛⲁϥ ϫⲉ ⲡϫⲟⲉⲓⲥ ⲡⲥⲱⲧⲏⲣ <text:line-break/><text:soft-page-break/><text:span text:style-name="T1"> </text:span><text:span text:style-name="T2">(96/16) </text:span> ⲉⲧⲃⲉ ⲟⲩ ⲁⲛⲁⲓ̈ ϣⲱⲡⲉ· ⲏ͂ ⲉⲧⲃⲉ <text:line-break/><text:span text:style-name="T1"> </text:span><text:span text:style-name="T2">(96/17) </text:span> ⲟⲩ ⲁⲛⲁⲓ̈ ⲟⲩⲱⲛϩ ⲉⲃⲟⲗ· ⲡⲉϫⲁϥ <text:line-break/><text:span text:style-name="T1"> </text:span><text:span text:style-name="T2">(96/18) </text:span> ⲛ̅ϭⲓ ⲡⲧⲉⲗⲓⲟⲥ ⲛ̅ⲥⲱⲧⲏⲣ· ϫⲉ ⲁⲛⲟⲕ <text:line-break/><text:span text:style-name="T1"> </text:span><text:span text:style-name="T2">(96/19) </text:span> ⲁⲉⲓ{ⲉ̅ⲓ} ⲉⲃⲟⲗ ϩⲙ̅ ⲡⲁⲡⲉⲣⲁⲛⲧⲟⲥ <text:line-break/><text:span text:style-name="T1"> </text:span><text:span text:style-name="T2">(96/20) </text:span> ϫⲉ ⲉⲉⲓⲛⲁϫⲱ ⲛⲏⲧⲛ̅ ⲛ̅ϩⲱⲃ· <text:line-break/><text:span text:style-name="T1"> </text:span><text:span text:style-name="T2">(96/21) </text:span> ⲛⲓⲙ· ⲡⲉⲡ̅ⲛ̅ⲁ̅ ⲉⲧϣⲟⲟⲡ%6 ⲛⲉⲩ‐ <text:line-break/><text:span text:style-name="T1"> </text:span><text:span text:style-name="T2">(96/22) </text:span> ⲣⲉϥϫⲡⲟ ⲡⲉ· ⲉⲩⲛ̅ⲧⲁϥ ⲙ̅ⲙⲁⲩ <text:line-break/><text:span text:style-name="T1"> </text:span><text:span text:style-name="T2">(96/23) </text:span> ⲛ̅ⲟⲩϭⲟⲙ 〈ⲛ̅〉ⲟⲩⲟⲩⲥⲓⲁ ⲛ̅ⲣⲉϥϫⲡⲟ <text:line-break/><text:span text:style-name="T1"> </text:span><text:span text:style-name="T2">(97/1) </text:span> ⲛ̅ⲣ[ⲉϥϯ] ⲙ̣ⲟⲣⲫⲏ ϫⲉⲕⲁⲁⲥ ⲉⲥⲛⲁ‐ <text:line-break/><text:span text:style-name="T1"> </text:span><text:span text:style-name="T2">(97/2) </text:span> ⲟⲩⲱ̣[ⲛϩ] ⲉⲃⲟⲗ ⲛ̅ϭⲓ ⲧⲛⲟϭ ⲙ̅ⲙⲛⲧ%6‐ <text:line-break/><text:span text:style-name="T1"> </text:span><text:span text:style-name="T2">(97/3) </text:span> {ⲧ}ⲣⲙ̅ⲙⲁⲟ· ⲉⲧϩⲏⲡ ⲛ̅ϩⲏⲧϥ̅ ⲉⲧⲃⲉ <text:line-break/><text:span text:style-name="T1"> </text:span><text:span text:style-name="T2">(97/4) </text:span> ⲧⲉϥⲙⲛ̅ⲧⲭⲣⲏⲥⲧⲟⲥ ⲙⲛ̅ ⲧⲉϥⲁⲅⲁⲡⲏ <text:line-break/><text:span text:style-name="T1"> </text:span><text:span text:style-name="T2">(97/5) </text:span> ⲁϥⲣ̅ϩⲛⲁϥ ϩⲓⲧⲟⲟⲧϥ̅ ⲙ̅ⲙⲓⲛ ⲙ̅‐ <text:line-break/><text:span text:style-name="T1"> </text:span><text:span text:style-name="T2">(97/6) </text:span> ⲙⲟϥ ⲉϫⲡⲉ ϩⲉⲛⲕⲁⲣⲡⲟⲥ ϫⲉ ⲛ̅‐ <text:line-break/><text:span text:style-name="T1"> </text:span><text:span text:style-name="T2">(97/7) </text:span> ⲛⲉϥⲁⲡⲟⲗ〈ⲁ〉ⲩⲉ ⲟⲩⲁⲁⲧϥ ϩⲛ̅ ⲧⲉϥⲙⲛ̅‐ <text:line-break/><text:span text:style-name="T1"> </text:span><text:span text:style-name="T2">(97/8) </text:span> ⲧⲁⲅⲁⲑⲟⲥ· ⲁⲗⲗⲁ ϩⲉⲛⲕⲉⲡ̅ⲛ̅ⲁ̅ ⲛ̅‐ <text:line-break/><text:span text:style-name="T1"> </text:span><text:span text:style-name="T2">(97/9) </text:span> ⲧⲉ ⲧⲅⲉⲛⲉⲁ ⲛ̅ⲁⲧⲕⲓⲙ· ⲉⲩⲉϫⲡⲉ <text:line-break/><text:span text:style-name="T1"> </text:span><text:span text:style-name="T2">(97/10) </text:span> ⲥⲱⲙⲁ ϩⲓ ⲕⲁⲣⲡⲟⲥ· ⲟⲩⲉⲟⲟⲩ ⲙⲛ̅ <text:line-break/><text:span text:style-name="T1"> </text:span><text:span text:style-name="T2">(97/11) </text:span> ⲟⲩⲧⲓⲙⲏ ϩⲛ̅ ⲟⲩⲁⲫⲑⲁⲣⲥⲓⲁ ⲙⲛ̅ <text:line-break/><text:span text:style-name="T1"> </text:span><text:span text:style-name="T2">(97/12) </text:span> ⲡⲉϥϩⲙⲟⲧ%6 ⲉⲧⲉ ⲙⲛⲧϥ̅ ⲁⲣⲏϫϥ̅· <text:line-break/><text:span text:style-name="T1"> </text:span><text:span text:style-name="T2">(97/13) </text:span> ϫⲉ ⲉⲣⲉⲡⲉϥⲁⲅⲁⲑⲟⲛ ⲟⲩⲱⲛϩ ⲉⲃⲟⲗ <text:line-break/><text:span text:style-name="T1"> </text:span><text:span text:style-name="T2">(97/14) </text:span> ϩⲓⲧⲛ̅ ⲡⲁⲩⲧⲟⲅⲉⲛⲏⲥ ⲛ̅ⲛⲟⲩⲧⲉ <text:line-break/><text:span text:style-name="T1"> </text:span><text:span text:style-name="T2">(97/15) </text:span> ⲛ̅ⲉⲓⲱⲧ%6 ⲛ̅ⲁⲫⲑⲁⲣⲥⲓⲁ ⲛⲓⲙ· ⲙⲛ̅ <text:line-break/><text:span text:style-name="T1"> </text:span><text:span text:style-name="T2">(97/16) </text:span> ⲛⲉⲛⲧⲁⲩϣⲱⲡⲉ ⲙⲛ̅ⲛ̅ⲥⲁ ⲛⲁⲓ̈ <text:line-break/><text:span text:style-name="T1"> </text:span><text:span text:style-name="T2">(97/17) </text:span> ⲛⲉ〈ⲙ〉ⲡⲁⲧⲟⲩⲉⲓ ⲇⲉ ⲉⲡⲉⲧⲟⲩⲁⲛϩ <text:line-break/><text:span text:style-name="T1"> </text:span><text:span text:style-name="T2">(97/18) </text:span> ⲡⲉ· ⲟⲩⲛ̅ ⲟⲩ→ϣ←{ⲉ}ⲓⲃⲉ ⲇⲉ ⲉⲛⲁϣⲱ〈ϥ〉 <text:line-break/><text:span text:style-name="T1"> </text:span><text:span text:style-name="T2">(97/19) </text:span> ⲟⲩⲧⲉ ⲛⲓⲁⲫⲑⲁⲣⲧⲟⲛ· ⲛⲉϥⲱϣ <text:line-break/><text:span text:style-name="T1"> </text:span><text:span text:style-name="T2">(97/20) </text:span> ⲉⲃⲟⲗ ⲉϥϫⲱ ⲙ̅ⲙⲟⲥ ϫⲉ ⲡⲉⲧⲉ <text:line-break/><text:span text:style-name="T1"> </text:span><text:span text:style-name="T2">(97/21) </text:span> ⲟⲩⲛ ⲙⲁⲁϫⲉ ⲙ̅ⲙⲟϥ ⲉⲥⲱⲧⲙ̅ ⲉ‐ <text:line-break/><text:span text:style-name="T1"> </text:span><text:span text:style-name="T2">(97/22) </text:span> ⲛⲓⲁⲡⲉⲣⲁⲛⲧⲟⲛ ⲙⲁⲣⲉϥⲥⲱⲧⲙ̅ <text:line-break/><text:span text:style-name="T1"> </text:span><text:span text:style-name="T2">(97/23) </text:span> ⲁⲩⲱ ⲛⲉⲧⲣⲏⲥ ⲁⲛⲟⲕ ⲁⲉⲓϣⲁϫⲉ <text:line-break/><text:span text:style-name="T1"> </text:span><text:span text:style-name="T2">(97/24) </text:span> ⲛ̅ⲙⲙⲁⲩ· ⲉⲧⲓ ⲁϥⲟⲩⲱϩ ⲉⲧⲟⲟⲧϥ̅· <text:line-break/><text:span text:style-name="T1"> </text:span><text:span text:style-name="T2">(98/1) </text:span> ⲡⲉϫⲁϥ ϫⲉ ⲛ̅ⲕⲁ ⲛⲓⲙ ⲛ̅ⲧ̣[ⲁⲩϣ]ⲱ‐ <text:line-break/><text:span text:style-name="T1"> </text:span><text:span text:style-name="T2">(98/2) </text:span> ⲡⲉ ⲉⲃⲟⲗ ϩⲙ̅ ⲡⲧⲁⲕⲟ ⲥⲉⲛ[ⲁⲧ]ⲁ‐ <text:line-break/><text:span text:style-name="T1"> </text:span><text:span text:style-name="T2">(98/3) </text:span> ⲕⲟ ϫⲉ ⲛ̅ⲧⲁⲩϣⲱⲡⲉ ⲉⲃⲟⲗ ϩ̣ⲙ̅ <text:line-break/><text:span text:style-name="T1"> </text:span><text:span text:style-name="T2">(98/4) </text:span> ⲡⲧⲁⲕⲟ· ⲡⲉⲛⲧⲁϥϣⲱⲡⲉ ⲇⲉ <text:line-break/><text:span text:style-name="T1"> </text:span><text:span text:style-name="T2">(98/5) </text:span> ⲉⲃⲟⲗ ϩⲛ̅ ⲧⲙⲛ̅ⲧ%6ⲁⲧ%6ⲧⲁⲕⲟ ⲙⲉϥⲧⲁ‐ <text:line-break/><text:span text:style-name="T1"> </text:span><text:span text:style-name="T2">(98/6) </text:span> ⲕⲟ ⲁⲗⲗⲁ ϣⲁϥϣⲱⲡⲉ ⲛ̅ⲁⲧ%6ⲧⲁ‐ <text:line-break/><text:span text:style-name="T1"> </text:span><text:span text:style-name="T2">(98/7) </text:span> ⲕⲟ· ϩⲱⲥ ⲟⲩⲙⲏⲏϣⲉ ⲛ̅ⲣⲱⲙⲉ <text:line-break/><text:span text:style-name="T1"> </text:span><text:span text:style-name="T2">(98/8) </text:span> ⲁⲩⲥⲱⲣⲙ̅ ⲉⲙⲡⲟⲩⲥⲟⲩⲛ̅ ⲧⲉⲉⲓ‐ <text:line-break/><text:span text:style-name="T1"> </text:span><text:span text:style-name="T2">(98/9) </text:span> ⲇⲓⲁⲫⲟⲣⲁ· ⲁⲩⲙⲟⲩ· ⲡⲉϫⲁⲥ ⲛⲁϥ <text:line-break/><text:span text:style-name="T1"> </text:span><text:span text:style-name="T2">(98/10) </text:span> ⲛ̅ϭⲓ ⲙⲁⲣⲓϩⲁⲙⲙⲏ ϫⲉ ⲡϫⲟⲉⲓⲥ <text:line-break/><text:span text:style-name="T1"> </text:span><text:span text:style-name="T2">(98/11) </text:span> ⲛ̅ⲁϣ ⲛ̅ϩⲉ ϭⲉ ⲉⲛⲛⲁⲥⲟⲩⲛ̅ ⲛⲁⲓ̈ <text:line-break/><text:span text:style-name="T1"> </text:span><text:span text:style-name="T2">(98/12) </text:span> ⲡⲉϫⲉ ⲡⲧⲉⲗⲓⲟⲥ ⲛ̅ⲥⲱⲧⲏⲣ ϫⲉ <text:line-break/><text:span text:style-name="T1"> </text:span><text:span text:style-name="T2">(98/13) </text:span> ⲁⲙⲏⲉⲓⲧⲛ̅ ϫⲓⲛ ⲛⲓⲁⲧⲟⲩⲱⲛϩ <text:line-break/><text:span text:style-name="T1"> </text:span><text:span text:style-name="T2">(98/14) </text:span> ⲉⲃⲟⲗ ϣⲁ ⲡϫⲱⲕ ⲛ̅ⲛⲉⲧⲟⲩⲁⲛϩ· <text:line-break/><text:span text:style-name="T1"> </text:span><text:span text:style-name="T2">(98/15) </text:span> ⲁⲩⲱ ⲛ̅ⲧⲟⲥ ⲧⲁⲡⲟϩⲣⲟⲓⲁ· ⲛ̅ⲧⲉ <text:line-break/><text:soft-page-break/><text:span text:style-name="T1"> </text:span><text:span text:style-name="T2">(98/16) </text:span> ⲧⲉⲛⲛⲟⲓⲁ ⲛⲁⲟⲩⲱⲛϩ ⲛⲏⲧⲛ̅ ⲉ‐ <text:line-break/><text:span text:style-name="T1"> </text:span><text:span text:style-name="T2">(98/17) </text:span> ⲃⲟⲗ· ϫⲉ ⲡⲱⲥ ⲧⲡⲓⲥⲧⲓⲥ ⲛ̅ⲛⲉ‐ <text:line-break/><text:span text:style-name="T1"> </text:span><text:span text:style-name="T2">(98/18) </text:span> ⲧⲉ ⲛ̅ⲥⲉⲟⲩⲟⲛϩ ⲉⲃⲟⲗ ⲁⲛ· ⲁⲩϭⲛⲧⲥ̅ <text:line-break/><text:span text:style-name="T1"> </text:span><text:span text:style-name="T2">(98/19) </text:span> ϩⲛ̅ ⲛⲉⲧⲟⲩⲟⲛϩ ⲉⲃⲟⲗ ⲛⲉⲧⲏⲡ%3 ⲉ‐ <text:line-break/><text:span text:style-name="T1"> </text:span><text:span text:style-name="T2">(98/20) </text:span> ⲡⲓⲁⲅⲉⲛⲛⲏⲧⲟⲥ ⲛ̅ⲉⲓⲱⲧ%6 ⲡⲉ <text:line-break/><text:span text:style-name="T1"> </text:span><text:span text:style-name="T2">(98/21) </text:span> ⲧⲉ ⲟⲩⲛ̅ⲧϥ̅ ⲙⲁⲁϫⲉ ⲉⲥⲱⲧⲙ̅· <text:line-break/><text:span text:style-name="T1"> </text:span><text:span text:style-name="T2">(98/22) </text:span> ⲙⲁⲣⲉϥⲥⲱⲧⲙ̅· ⲡϫⲟⲉⲓⲥ ⲙ̅ⲡⲧⲏⲣϥ <text:line-break/><text:span text:style-name="T1"> </text:span><text:span text:style-name="T2">(98/23) </text:span> ⲉϣⲁⲩϫⲟⲟⲥ ⲉⲣⲟϥ ⲁⲛ ϫⲉ ⲉⲓⲱⲧ%6 <text:line-break/><text:span text:style-name="T1"> </text:span><text:span text:style-name="T2">(98/24) </text:span> ⲁⲗⲗⲁ ⲡⲣⲟⲡⲁⲧⲱⲣ· 〈ⲡⲉⲓⲱⲧ ⲅⲁⲣ〉 ⲧ%6ⲁⲣⲭⲏ ⲛ̅ⲧⲉ <text:line-break/><text:span text:style-name="T1"> </text:span><text:span text:style-name="T2">(98/25) </text:span> ⲛⲉⲧⲛⲁⲟⲩⲱⲛϩ ⲉⲃⲟⲗ 〈ⲡⲉ〉· ⲡⲉⲧⲙ̅‐ <text:line-break/><text:span text:style-name="T1"> </text:span><text:span text:style-name="T2">(99/1) </text:span> ⲙⲁⲩ ⲇ̣[ⲉ ⲡⲓ]ⲁⲛⲁⲣⲭⲟⲥ ⲛ̅ⲡⲣⲟⲡⲁ‐ <text:line-break/><text:span text:style-name="T1"> </text:span><text:span text:style-name="T2">(99/2) </text:span> ⲧⲱⲣ̣[· ⲉϥ]ⲛⲁⲩ ⲉⲣⲟϥ ⲙ̅ⲙⲓⲛ ⲙ̅ⲙⲟϥ <text:line-break/><text:span text:style-name="T1"> </text:span><text:span text:style-name="T2">(99/3) </text:span> ⲛ̅ϩⲣⲁ̣[ⲓ̈] ⲛ̅ϩⲏⲧϥ̅ ϩⲛ̅ ⲟⲩⲉⲓⲁⲗ· ⲁϥⲟⲩ‐ <text:line-break/><text:span text:style-name="T1"> </text:span><text:span text:style-name="T2">(99/4) </text:span> ⲱⲛϩ ⲉⲃⲟⲗ ⲉϥⲉⲓⲛⲉ ⲙ̅ⲙⲟϥ ⲙ̅ⲙⲓⲛ <text:line-break/><text:span text:style-name="T1"> </text:span><text:span text:style-name="T2">(99/5) </text:span> ⲙ̅ⲙⲟϥ ⲛ̅ⲧⲟϥ ⲇⲉ ⲡⲉϥⲉⲓⲛⲉ ⲁϥ‐ <text:line-break/><text:span text:style-name="T1"> </text:span><text:span text:style-name="T2">(99/6) </text:span> ⲟⲩⲱⲛϩ ⲉⲃⲟⲗ· ⲛ̅ⲟⲩⲛⲟⲩⲧⲉ ⲛ̅ⲉⲓ‐ <text:line-break/><text:span text:style-name="T1"> </text:span><text:span text:style-name="T2">(99/7) </text:span> ⲱⲧ%6 ϩⲓⲧⲟⲟⲧϥ̅ ⲙ̅ⲙⲓⲛ ⲙ̅ⲙⲟϥ <text:line-break/><text:span text:style-name="T1"> </text:span><text:span text:style-name="T2">(99/8) </text:span> ⲁⲩⲱ 〈ⲛ̅〉ⲁⲛⲧⲟⲡⲟⲥ †ϩⲓϫⲛ̅ ⲛⲁⲛⲧⲟ‐ <text:line-break/><text:span text:style-name="T1"> </text:span><text:span text:style-name="T2">(99/9) </text:span> ⲡⲓⲧⲟⲛ† ⲡⲉⲡⲣⲟⲟⲛⲧⲟⲥ ⲛ̅ⲁⲅⲉⲛ‐ <text:line-break/><text:span text:style-name="T1"> </text:span><text:span text:style-name="T2">(99/10) </text:span> ⲛⲏⲧⲟⲥ ⲛ̅ⲉⲓⲱⲧ%6 ⲟⲩϩⲓⲥⲟⲭⲣⲟ‐ <text:line-break/><text:span text:style-name="T1"> </text:span><text:span text:style-name="T2">(99/11) </text:span> ⲛⲟⲥ ⲙⲉⲛ ⲡⲉ {ϩ}ⲙ̅ⲡⲟⲩⲟⲉⲓⲛ ⲉⲧϩⲁ‐ <text:line-break/><text:span text:style-name="T1"> </text:span><text:span text:style-name="T2">(99/12) </text:span> ⲧⲉϥⲉϩⲏ ⲁⲗⲗⲁ ⲛ̅ϥϣⲏϣ ⲛ̅ⲙⲙⲁϥ <text:line-break/><text:span text:style-name="T1"> </text:span><text:span text:style-name="T2">(99/13) </text:span> ⲁⲛ ϩ̅ⲛ̅ ⲧϭⲟⲙ· ⲙⲛ̅ⲛ̅ⲥⲱϥ ⲇⲉ ⲁⲩⲟⲩ‐ <text:line-break/><text:span text:style-name="T1"> </text:span><text:span text:style-name="T2">(99/14) </text:span> ⲱⲛϩ ⲉⲃⲟⲗ ⲛ̅ϭⲓ ⲟⲩⲙⲏⲏϣⲉ ⲛ̅ⲁⲛ‐ <text:line-break/><text:span text:style-name="T1"> </text:span><text:span text:style-name="T2">(99/15) </text:span> ⲧⲟⲡⲟⲥ ⲛ̅ⲁⲩⲧⲟⲅⲉⲛⲏⲥ ⲧⲏⲣⲟⲩ ⲛ̅‐ <text:line-break/><text:span text:style-name="T1"> </text:span><text:span text:style-name="T2">(99/16) </text:span> ϩⲓⲥⲟⲭⲣⲟⲛⲟⲥ ϩⲓ ϩⲓⲥⲟⲇⲩⲛⲁⲙⲓⲥ <text:line-break/><text:span text:style-name="T1"> </text:span><text:span text:style-name="T2">(99/17) </text:span> ⲉⲩϩⲁ ⲉⲟⲟⲩ ⲉⲙⲛ̅ⲧⲟⲩ ⲏⲡⲉ· ⲉϣⲁⲩ‐ <text:line-break/><text:span text:style-name="T1"> </text:span><text:span text:style-name="T2">(99/18) </text:span> ⲙⲟⲩⲧⲉ ⲉⲡⲉⲩⲅⲉⲛⲟⲥ ϫⲉ ⲧⲅⲉⲛⲉ‐ <text:line-break/><text:span text:style-name="T1"> </text:span><text:span text:style-name="T2">(99/19) </text:span> ⲁ· ⲉⲧⲉ ⲙⲛ̅ ⲙⲛ̅ⲧ%6ⲣ̅ⲣⲟ ϩⲓϫⲱⲥ †ⲉ‐ <text:line-break/><text:span text:style-name="T1"> </text:span><text:span text:style-name="T2">(99/20) </text:span> ⲃⲟⲗ ϩⲙ̅ ⲡⲉⲛⲧⲁⲧⲉⲧⲛ̅ⲟⲩⲱⲛϩ ⲛ̅‐ <text:line-break/><text:span text:style-name="T1"> </text:span><text:span text:style-name="T2">(99/21) </text:span> ϩⲏⲧϥ̅ ϩⲱⲧ%6ⲧⲏⲟⲩⲧⲛ̅ ⲉⲃⲟⲗ ϩⲛ̅ ⲛⲓ‐ <text:line-break/><text:span text:style-name="T1"> </text:span><text:span text:style-name="T2">(99/22) </text:span> ⲣⲱⲙⲉ ⲉⲧⲙ̅ⲙⲁⲩ·† ⲡⲙⲏⲏϣⲉ <text:line-break/><text:span text:style-name="T1"> </text:span><text:span text:style-name="T2">(99/23) </text:span> ⲇⲉ ⲧⲏⲣϥ̅ ⲉⲧⲙ̅ⲙⲁⲩ ⲉⲧⲉ ⲙⲛ̅ ⲙⲛ̅ⲧ‐ <text:line-break/><text:span text:style-name="T1"> </text:span><text:span text:style-name="T2">(99/24) </text:span> ⲣ̅ⲣⲟ ϩⲓϫⲱⲟⲩ ϣⲁⲩⲙⲟⲩⲧⲉ ⲉⲣⲟ‐ <text:line-break/><text:span text:style-name="T1"> </text:span><text:span text:style-name="T2">(100/1) </text:span> ⲟⲩ ϫⲉ ⲛ̅ϣⲏⲣⲉ ⲙ̅ⲡⲁⲅ̣[ⲉⲛⲛ]ⲏ̣ⲧⲟⲥ <text:line-break/><text:span text:style-name="T1"> </text:span><text:span text:style-name="T2">(100/2) </text:span> ⲛ̅ⲉⲓⲱⲧ%3 ⲡⲛⲟⲩⲧⲉ ⲡⲥ[ⲱⲧ]ⲏ̣ⲣ <text:line-break/><text:span text:style-name="T1"> </text:span><text:span text:style-name="T2">(100/3) </text:span> ⲡϣⲏⲣⲉ 〈ⲙ̅〉ⲡⲛⲟⲩⲧⲉ ⲡⲁⲓ̈ ⲉⲧⲉ <text:line-break/><text:span text:style-name="T1"> </text:span><text:span text:style-name="T2">(100/4) </text:span> ⲡⲉϥⲉⲓⲛⲉ ⲛⲙ̅ⲙⲏⲧⲛ̅ ⲛ̅ⲧⲟϥ <text:line-break/><text:span text:style-name="T1"> </text:span><text:span text:style-name="T2">(100/5) </text:span> ⲇⲉ ⲡⲉ ⲡⲁⲧⲣ̅ⲛⲟⲉⲓ ⲙ̅ⲙⲟϥ· <text:line-break/><text:span text:style-name="T1"> </text:span><text:span text:style-name="T2">(100/6) </text:span> ⲉϥⲙⲉϩ ⲛ̅ⲉⲟⲟⲩ ⲛⲓⲙ ⲛ̅ⲁⲫⲑⲁⲣ‐ <text:line-break/><text:span text:style-name="T1"> </text:span><text:span text:style-name="T2">(100/7) </text:span> ⲧⲟⲛ ϩⲓ ⲣⲁϣⲉ ⲛ̅ⲁⲧϣⲁϫⲉ ⲉⲣⲟϥ <text:line-break/><text:span text:style-name="T1"> </text:span><text:span text:style-name="T2">(100/8) </text:span> ⲛ̅ⲧⲟⲟⲩ ⲧⲏⲣⲟⲩ ⲥⲉⲙ̅ⲧⲟⲛ ⲙ̅‐ <text:line-break/><text:span text:style-name="T1"> </text:span><text:span text:style-name="T2">(100/9) </text:span> ⲙⲟⲟⲩ ⲛ̅ϩⲏⲧϥ̅· ⲉⲩⲙⲏⲛ ⲉⲃⲟⲗ <text:line-break/><text:span text:style-name="T1"> </text:span><text:span text:style-name="T2">(100/10) </text:span> ⲉⲩⲣⲁϣⲉ ϩⲛ̅ ⲟⲩⲣⲁϣⲉ ⲛ̅ⲁⲧϣⲁ‐ <text:line-break/><text:span text:style-name="T1"> </text:span><text:span text:style-name="T2">(100/11) </text:span> ϫⲉ ⲉⲣⲟϥ ϩⲙ̅ ⲡⲉϥⲉⲟⲟⲩ ⲉⲧⲉ ⲙⲉϥ‐ <text:line-break/><text:span text:style-name="T1"> </text:span><text:span text:style-name="T2">(100/12) </text:span> ϣⲓⲃⲉ ⲙⲛ̅ ⲡⲧⲉⲗⲏⲗ ⲉⲧⲉ ⲙⲉⲩ‐ <text:line-break/><text:span text:style-name="T1"> </text:span><text:span text:style-name="T2">(100/13) </text:span> ϣⲓⲧϥ̅· ⲡⲁⲓ̈ ⲙ̅ⲡⲟⲩⲥⲟⲧⲙⲉϥ̅ ⲉ‐ <text:line-break/><text:soft-page-break/><text:span text:style-name="T1"> </text:span><text:span text:style-name="T2">(100/14) </text:span> ⲛⲉϩ ⲟⲩⲇⲉ ⲙ̅ⲡⲟⲩⲛⲟⲉⲓ ⲙ̅ⲙⲟϥ <text:line-break/><text:span text:style-name="T1"> </text:span><text:span text:style-name="T2">(100/15) </text:span> ϩⲛ̅ ⲁⲓⲱⲛ ⲛⲓⲙ· ⲙⲛ̅ ⲛⲉⲩⲕⲟⲥ‐ <text:line-break/><text:span text:style-name="T1"> </text:span><text:span text:style-name="T2">(100/16) </text:span> ⲙⲟⲥ ϣⲁ ⲧⲉⲛⲟⲩ· ⲡⲉϫⲁϥ <text:line-break/><text:span text:style-name="T1"> </text:span><text:span text:style-name="T2">(100/17) </text:span> ⲛⲁϥ ⲛ̅ϭⲓ ⲙⲁⲑ%6ⲑⲁⲓⲟⲥ ϫⲉ ⲡϫⲟ‐ <text:line-break/><text:span text:style-name="T1"> </text:span><text:span text:style-name="T2">(100/18) </text:span> ⲉⲓⲥ ⲡⲥⲱⲧⲏⲣ· ⲡⲱⲥ ⲁⲡⲣⲱⲙⲉ <text:line-break/><text:span text:style-name="T1"> </text:span><text:span text:style-name="T2">(100/19) </text:span> ⲟⲩⲱⲛϩ ⲉⲃⲟⲗ· ⲡⲉϫⲉ ⲡⲧⲉⲗⲓ‐ <text:line-break/><text:span text:style-name="T1"> </text:span><text:span text:style-name="T2">(100/20) </text:span> ⲟⲥ ⲛ̅ⲥⲱⲧⲏⲣ· ϫⲉ ϯⲟⲩⲱϣ <text:line-break/><text:span text:style-name="T1"> </text:span><text:span text:style-name="T2">(100/21) </text:span> ⲉⲧⲣⲉⲧⲛ̅ⲉⲓⲙⲉ ϫⲉ ⲡⲉⲛⲧⲁϥ <text:line-break/><text:span text:style-name="T1"> </text:span><text:span text:style-name="T2">(100/22) </text:span> ⲟⲩⲱⲛϩ ϩⲁⲑⲏ ⲙ̅ⲡⲧⲏⲣϥ· ϩⲙ̅ <text:line-break/><text:span text:style-name="T1"> </text:span><text:span text:style-name="T2">(100/23) </text:span> ⲡⲁⲡⲉⲣⲁⲛⲧⲟⲛ ⲡⲓⲁⲩⲧⲟⲫⲩⲏⲥ <text:line-break/><text:span text:style-name="T1"> </text:span><text:span text:style-name="T2">(101/1) </text:span> ⲛ̅ⲁⲩⲧⲟⲕⲧⲓⲥⲧⲟⲥ ⲛ̅ⲉⲓⲱⲧ%3 ⲉϥ‐ <text:line-break/><text:span text:style-name="T1"> </text:span><text:span text:style-name="T2">(101/2) </text:span> ϫⲏⲕ ⲉⲃⲟⲗ ⲙ̅ⲡⲟⲩⲟⲉⲓⲛ ⲉⲧⲣ̅ⲟⲩ‐ <text:line-break/><text:span text:style-name="T1"> </text:span><text:span text:style-name="T2">(101/3) </text:span> ⲟⲉⲓⲛ ⲉⲩⲁⲧ%6ϣⲁϫⲉ ⲉⲣⲟϥ ⲡⲉ <text:line-break/><text:span text:style-name="T1"> </text:span><text:span text:style-name="T2">(101/4) </text:span> ⲉⲁϥⲛⲟⲉⲓ ⲛ̅ⲧⲁⲣⲭⲏ ⲉⲧⲣⲉⲡⲉϥ‐ <text:line-break/><text:span text:style-name="T1"> </text:span><text:span text:style-name="T2">(101/5) </text:span> ⲉⲓⲛⲉ ϣⲱⲡⲉ ⲛ̅ⲟⲩⲛⲟϭ ⲛ̅ϭⲟⲙ· <text:line-break/><text:span text:style-name="T1"> </text:span><text:span text:style-name="T2">(101/6) </text:span> ⲛ̅ⲧⲉⲩⲛⲟⲩ ⲁⲧⲁⲣⲭⲏ ⲙ̅ⲡⲟⲩⲟⲉⲓⲛ <text:line-break/><text:span text:style-name="T1"> </text:span><text:span text:style-name="T2">(101/7) </text:span> ⲉⲧⲙ̅ⲙⲁⲩ ⲟⲩⲱⲛϩ ⲛ̅ⲟⲩⲣⲱⲙⲉ <text:line-break/><text:span text:style-name="T1"> </text:span><text:span text:style-name="T2">(101/8) </text:span> ⲛ̅ⲁⲑⲁⲛⲁⲧⲟⲥ ⲛ̅ϩⲟⲟⲩⲧ%6ⲥϩⲓⲙⲉ <text:line-break/><text:span text:style-name="T1"> </text:span><text:span text:style-name="T2">(101/9) </text:span> ϫⲉⲕⲁⲁⲥ ⲉⲃⲟⲗ ϩⲓⲧⲛ̅ ⲡⲓⲣⲱⲙⲉ <text:line-break/><text:span text:style-name="T1"> </text:span><text:span text:style-name="T2">(101/10) </text:span> ⲉⲧⲙ̅ⲙⲁⲩ ⲛ̅ⲁⲑⲁⲛⲁⲧⲟⲥ ⲉⲩⲉϯ <text:line-break/><text:span text:style-name="T1"> </text:span><text:span text:style-name="T2">(101/11) </text:span> ⲙⲁⲧⲉ ⲙ̅ⲡⲉⲩϫⲁⲓ̈ ⲛ̅ⲥⲉⲛⲏⲫⲉ <text:line-break/><text:span text:style-name="T1"> </text:span><text:span text:style-name="T2">(101/12) </text:span> ⲉⲃⲟⲗ ϩⲛ̅ ⲧⲃ̅ϣⲉ ϩⲓⲧⲛ̅ ⲫⲉⲣⲙⲏ‐ <text:line-break/><text:span text:style-name="T1"> </text:span><text:span text:style-name="T2">(101/13) </text:span> ⲛⲉⲩⲧⲏⲥ ⲛ̅ⲧⲁⲩⲧⲛ̅ⲛⲟⲟⲩϥ· ⲡⲁⲓ̈ <text:line-break/><text:span text:style-name="T1"> </text:span><text:span text:style-name="T2">(101/14) </text:span> ⲉⲧⲛⲙ̅ⲙⲏⲧⲛ̅ ϣⲁ ⲡϫⲱⲕ ⲉⲃⲟⲗ <text:line-break/><text:span text:style-name="T1"> </text:span><text:span text:style-name="T2">(101/15) </text:span> ⲛ̅ⲧⲙⲛ̅ⲧϩⲏⲕⲉ ⲛ̅ⲛ̅ⲥⲟⲟⲛⲉ· ⲧⲉϥ‐ <text:line-break/><text:span text:style-name="T1"> </text:span><text:span text:style-name="T2">(101/16) </text:span> ⲥⲩⲛⲍ%6ⲩⲅⲟⲥ ⲇⲉ ⲧⲉ ⲧⲛⲟϭ ⲛ̅ⲥⲟ‐ <text:line-break/><text:span text:style-name="T1"> </text:span><text:span text:style-name="T2">(101/17) </text:span> ⲫⲓⲁ· ⲛ̅ⲧⲁⲩⲧⲟϣⲥ̅ ϫⲓⲛ ⲛ̅ϣⲟⲣⲡ%6 <text:line-break/><text:span text:style-name="T1"> </text:span><text:span text:style-name="T2">(101/18) </text:span> ⲛ̅ϩⲣⲁⲓ̈ ⲛ̅ϩⲏⲧϥ̅ ⲉⲩⲛⲟⲩϩⲃ̅ ϩⲓⲧⲛ̅ <text:line-break/><text:span text:style-name="T1"> </text:span><text:span text:style-name="T2">(101/19) </text:span> ⲡⲁⲩⲧⲟⲅ%6ⲉⲛⲏⲥ ⲛ̅ⲉⲓⲱⲧ%6 ⲉⲃⲟⲗ ϩⲙ̅ <text:line-break/><text:span text:style-name="T1"> </text:span><text:span text:style-name="T2">(101/20) </text:span> ⲡⲁⲑⲁⲛⲁⲧⲟⲥ ⲛ̅ⲣⲱⲙⲉ ⲛ̅ⲧⲁ〈ⲩ〉ⲟⲩ‐ <text:line-break/><text:span text:style-name="T1"> </text:span><text:span text:style-name="T2">(101/21) </text:span> ⲱⲛϩ ⲉⲃⲟⲗ ⲛ̅ϣⲟⲣⲡ%6 ϩⲓ ⲙⲛ̅ⲧⲛⲟⲩ‐ <text:line-break/><text:span text:style-name="T1"> </text:span><text:span text:style-name="T2">(101/22) </text:span> ⲧⲉ ϩⲓ ⲙⲛ̅ⲧⲣ̅ⲣⲟ ⲡⲉⲓⲱⲧ%6 ⲅⲁⲣ ⲉϣⲁⲩ‐ <text:line-break/><text:span text:style-name="T1"> </text:span><text:span text:style-name="T2">(102/1) </text:span> ⲙⲟⲩⲧⲉ ⲉⲣⲟϥ ϫⲉ ⲡⲣⲱⲙⲉ· ⲡⲁⲩ‐ <text:line-break/><text:span text:style-name="T1"> </text:span><text:span text:style-name="T2">(102/2) </text:span> ⲧⲟⲡⲁⲧⲱⲣ ⲁϥⲟⲩⲱⲛϩ ⲙ̅ⲡⲁⲓ̈ ⲉ‐ <text:line-break/><text:span text:style-name="T1"> </text:span><text:span text:style-name="T2">(102/3) </text:span> ⲃⲟⲗ ⲁϥⲧⲁⲙⲓⲟ ⲛⲁϥ ⲛ̅ⲟⲩⲛⲟϭ ⲛ̅‐ <text:line-break/><text:span text:style-name="T1"> </text:span><text:span text:style-name="T2">(102/4) </text:span> ⲁⲓⲱⲛ ⲉⲡⲉϥⲣⲁⲛ ⲡⲉ ϩⲟⲅⲇⲟⲁⲥ <text:line-break/><text:span text:style-name="T1"> </text:span><text:span text:style-name="T2">(102/5) </text:span> ⲡⲣⲟⲥ ⲧⲉϥⲙⲛ̅ⲧⲛⲟϭ ⲁⲩϯ ⲛⲁϥ <text:line-break/><text:span text:style-name="T1"> </text:span><text:span text:style-name="T2">(102/6) </text:span> ⲛ̅ⲟⲩⲛⲟϭ ⲛ̅ⲉⲝⲟⲩⲥⲓⲁ ⲁϥⲣ̅ ⲣ̅ⲣⲟ <text:line-break/><text:span text:style-name="T1"> </text:span><text:span text:style-name="T2">(102/7) </text:span> ⲉϫⲙ̅ ⲡⲥⲱⲛⲧ̅ ⲛ̅ⲧⲙⲛⲧ%6ϩⲏⲕⲉ <text:line-break/><text:span text:style-name="T1"> </text:span><text:span text:style-name="T2">(102/8) </text:span> ⲁϥⲥⲱⲛⲧ%6 ⲛⲁϥ ⲛ̅ϩⲉⲛⲛⲟⲩⲧⲉ <text:line-break/><text:span text:style-name="T1"> </text:span><text:span text:style-name="T2">(102/9) </text:span> ⲙⲛ̅ ϩⲉⲛⲁⲅ%3ⲅⲉⲗⲟⲥ 〈ⲙⲛ̅〉 ϩⲉⲛⲁⲣⲭⲁⲅ%6‐ <text:line-break/><text:span text:style-name="T1"> </text:span><text:span text:style-name="T2">(102/10) </text:span> ⲅⲉⲗⲟⲥ ϩⲉⲛⲧⲃⲁ ⲉⲙⲛ̅ⲧⲟⲩ ⲏⲡⲉ <text:line-break/><text:span text:style-name="T1"> </text:span><text:span text:style-name="T2">(102/11) </text:span> ⲉⲩϣⲙ̅ϣⲉ ⲉⲃⲟⲗ ϩⲙ̅ ⲡⲟⲩⲟⲉⲓⲛ <text:line-break/><text:span text:style-name="T1"> </text:span><text:span text:style-name="T2">(102/12) </text:span> ⲉⲧⲙ̅ⲙⲁⲩ ⲙⲛ̅ ⲡⲉⲡ̅ⲛ̅ⲁ̅ ⲛ̅ϣⲟ‐ <text:line-break/><text:span text:style-name="T1"> </text:span><text:span text:style-name="T2">(102/13) </text:span> ⲙⲛ̅ⲧ ⲛ̅ϩⲟⲟⲩⲧ%3 ⲉⲧⲉ ⲡⲁ ⲧⲥⲟ‐ <text:line-break/><text:span text:style-name="T1"> </text:span><text:span text:style-name="T2">(102/14) </text:span> ⲫⲓⲁ ⲡⲉ ⲧⲉϥⲥⲩⲛⲍⲩⲅⲟⲥ ⲉ‐ <text:line-break/><text:span text:style-name="T1"> </text:span><text:span text:style-name="T2">(102/15) </text:span> ⲃⲟⲗ ⲅⲁⲣ ϩⲙ̅ ⲡⲉⲉⲓⲛⲟⲩⲧⲉ ⲁⲥ‐ <text:line-break/><text:soft-page-break/><text:span text:style-name="T1"> </text:span><text:span text:style-name="T2">(102/16) </text:span> ⲁⲣⲭⲉⲥⲑⲁⲓ ⲛ̅ϭⲓ ⲧⲙⲛ̅〈ⲧ〉ⲛⲟⲩⲧⲉ <text:line-break/><text:span text:style-name="T1"> </text:span><text:span text:style-name="T2">(102/17) </text:span> ⲙⲛ̅ ⲧⲙⲛ̅ⲧⲣ̅ⲣⲟ· ⲉⲧⲃⲉ ⲡⲁⲓ̈ ⲁⲩ‐ <text:line-break/><text:span text:style-name="T1"> </text:span><text:span text:style-name="T2">(102/18) </text:span> ⲙⲟⲩⲧⲉ ⲉⲣⲟϥ ϫⲉ ⲡⲛⲟⲩⲧⲉ ⲛ̅‐ <text:line-break/><text:span text:style-name="T1"> </text:span><text:span text:style-name="T2">(102/19) </text:span> ⲛ̅ⲛⲟⲩⲧⲉ· ⲡⲣ̅ⲣⲟ ⲛ̅ⲣ̅ⲣⲱⲟⲩ ⲡⲉ <text:line-break/><text:span text:style-name="T1"> </text:span><text:span text:style-name="T2">(102/20) </text:span> ϩⲟⲩⲉⲓⲧ%6 ⲛ̅ⲣⲱⲙⲉ ⲉⲩⲛ̅ⲧⲁϥ ⲙ̅‐ <text:line-break/><text:span text:style-name="T1"> </text:span><text:span text:style-name="T2">(102/21) </text:span> ⲙⲁⲩ ⲙ̅ⲡⲉϥϩⲓⲇⲓⲟⲛ ⲛ̅ⲛⲟⲩⲥ <text:line-break/><text:span text:style-name="T1"> </text:span><text:span text:style-name="T2">(102/22) </text:span> ⲛ̅ϩⲣⲁⲓ̈ ⲛ̅ϩⲏⲧϥ̅· ⲙⲛ̅ ⲟⲩⲉⲛⲛⲟⲓⲁ <text:line-break/><text:span text:style-name="T1"> </text:span><text:span text:style-name="T2">(102/23) </text:span> ⲛ̅ⲑⲉ ⲉⲧϥ̅ⲟ ⲙ̅ⲙⲟⲥ ⲟⲩⲫⲣⲟⲛⲏ‐ <text:line-break/><text:span text:style-name="T1"> </text:span><text:span text:style-name="T2">(102/24) </text:span> ⲥⲓⲥ ⲟⲩⲉⲛⲑⲩⲙⲏⲥⲓⲥ ⲟⲩⲗⲟⲅⲓ‐ <text:line-break/><text:span text:style-name="T1"> </text:span><text:span text:style-name="T2">(103/1) </text:span> ⲥⲙⲟⲥ ⲟⲩϭⲟⲙ· ⲙⲉⲗⲟⲥ ⲛⲓⲙ ⲉⲩ‐ <text:line-break/><text:span text:style-name="T1"> </text:span><text:span text:style-name="T2">(103/2) </text:span> ϣⲟⲟⲡ%6 ϩⲛ̅ⲧⲉⲗⲓⲟⲛ ⲛⲉ ⲁⲩⲱ <text:line-break/><text:span text:style-name="T1"> </text:span><text:span text:style-name="T2">(103/3) </text:span> ϩⲉⲛⲁⲑⲁⲛⲁⲧⲟⲛ ⲛⲉ ⲕⲁⲧⲁ ⲙⲉⲛ <text:line-break/><text:span text:style-name="T1"> </text:span><text:span text:style-name="T2">(103/4) </text:span> ⲧⲁⲫⲑⲁⲣⲥⲓⲁ ⲥⲉϣⲏϣ· ⲕⲁⲧⲁ ⲟⲩ‐ <text:line-break/><text:span text:style-name="T1"> </text:span><text:span text:style-name="T2">(103/5) </text:span> ϭⲟⲙ ⲥⲉϣⲟⲃⲉ· ⲛ̅ⲑⲉ ⲙ̅ⲡϣⲓⲃⲉ <text:line-break/><text:span text:style-name="T1"> </text:span><text:span text:style-name="T2">(103/6) </text:span> ⲛ̅ⲟⲩⲉⲓⲱⲧ%3 ⲉⲩϣⲏⲣⲉ· 〈ⲁⲩⲱ ⲟⲩϣⲏⲣⲉ〉 ⲉⲩⲉⲛⲛⲟⲓⲁ· <text:line-break/><text:span text:style-name="T1"> </text:span><text:span text:style-name="T2">(103/7) </text:span> ⲁⲩⲱ ⲧⲉⲛⲛⲟⲓⲁ ⲉⲡϣⲱϫⲡ%6 ⲛ̅ⲑⲉ <text:line-break/><text:span text:style-name="T1"> </text:span><text:span text:style-name="T2">(103/8) </text:span> ⲛ̅ⲛⲉⲛⲧⲁⲉⲓⲣ̅ ϣⲣ̅ⲡ%6 ⲛ̅ϫⲟⲟⲩ ϩⲛ̅ <text:line-break/><text:span text:style-name="T1"> </text:span><text:span text:style-name="T2">(103/9) </text:span> ⲛⲉⲛⲧⲁⲩϫⲡⲟⲟⲩ ⲧⲙⲟⲛⲁⲥ ⲛ̅‐ <text:line-break/><text:span text:style-name="T1"> </text:span><text:span text:style-name="T2">(103/10) </text:span> ϣⲟⲣⲡ%6 〈ⲛ̅〉ⲑⲁⲏ ⲇⲉ ⲛ̅ⲛ̅ⲕⲁ ⲛⲓⲙ· ⲁϥ‐ <text:line-break/><text:span text:style-name="T1"> </text:span><text:span text:style-name="T2">(103/11) </text:span> ⲟⲩⲱⲛϩ ⲉⲃⲟⲗ ⲛ̅ϭⲓ ⲡⲉⲛⲧⲁⲩⲟⲩⲟⲛϩϥ <text:line-break/><text:span text:style-name="T1"> </text:span><text:span text:style-name="T2">(103/12) </text:span> ⲉⲃⲟⲗ ⲧⲏⲣϥ· ⲉⲃⲟⲗ ϩⲛ̅ ⲧⲉϥϭⲟⲙ· <text:line-break/><text:span text:style-name="T1"> </text:span><text:span text:style-name="T2">(103/13) </text:span> ⲁⲩⲱ ⲉⲃⲟⲗ ϩⲙ̅ ⲡⲉⲛⲧⲁⲩⲥⲟⲛⲧϥ̅ <text:line-break/><text:span text:style-name="T1"> </text:span><text:span text:style-name="T2">(103/14) </text:span> ⲁϥⲟⲩⲱⲛϩ ⲉⲃⲟⲗ ⲛ̅ϭⲓ ⲡⲉⲛⲧⲁⲩ‐ <text:line-break/><text:span text:style-name="T1"> </text:span><text:span text:style-name="T2">(103/15) </text:span> ⲣ̅ⲡⲗⲁⲥⲥⲁ ⲙ̅ⲙⲟϥ ⲧⲏⲣϥ· ⲉⲃⲟⲗ ϩⲙ̅ <text:line-break/><text:span text:style-name="T1"> </text:span><text:span text:style-name="T2">(103/16) </text:span> ⲡⲉⲛⲧⲁⲩⲣ̅ⲡⲗⲁⲥⲥⲁ ⲙ̅ⲙⲟϥ ⲁϥ‐ <text:line-break/><text:span text:style-name="T1"> </text:span><text:span text:style-name="T2">(103/17) </text:span> ⲟⲩⲱⲛϩ ⲛ̅ϭⲓ ⲡⲉⲛⲧⲁϥϫⲓ ⲙⲟⲣ‐ <text:line-break/><text:span text:style-name="T1"> </text:span><text:span text:style-name="T2">(103/18) </text:span> ⲫⲏ ⲉⲃⲟⲗ ϩⲙ̅ ⲡⲉⲛⲧⲁϥϫⲓ ⲙⲟⲣⲫⲏ <text:line-break/><text:span text:style-name="T1"> </text:span><text:span text:style-name="T2">(103/19) </text:span> ⲡⲉⲛⲧⲁⲩϯⲣⲁⲛ ⲉⲣⲟϥ ⲉⲧⲃⲉ ⲡⲁⲓ̈ <text:line-break/><text:span text:style-name="T1"> </text:span><text:span text:style-name="T2">(103/20) </text:span> ⲁⲡϣⲓⲃⲉ ϣⲱⲡⲉ ⲛ̅ⲛⲓⲁⲅⲉⲛⲛⲏ‐ <text:line-break/><text:span text:style-name="T1"> </text:span><text:span text:style-name="T2">(103/21) </text:span> ⲧⲟⲥ ϫⲛ̅ ⲛ̅ⲧⲁⲣⲭⲏ ϣⲁ ⲁⲣⲏϫⲛⲟⲩ <text:line-break/><text:span text:style-name="T1"> </text:span><text:span text:style-name="T2">(103/22) </text:span> ⲧ̣ⲟⲧⲉ ⲡⲉϫⲁϥ ⲛⲁϥ ⲛ̅ϭⲓ ⲃⲁⲣⲑⲟⲗⲟ‐ <text:line-break/><text:span text:style-name="T1"> </text:span><text:span text:style-name="T2">(103/23) </text:span> ⲙⲁⲓⲟⲥ ϫⲉ ⲡⲱⲥ ⲁⲩⲟⲛⲟⲙⲁⲍⲉ 〈ⲙ̅ⲙⲟϥ〉 ϩⲓ <text:line-break/><text:span text:style-name="T1"> </text:span><text:span text:style-name="T2">(104/1) </text:span> ⲡⲉⲩⲁⲅ%3ⲅⲉⲗ〈ⲓ〉ⲟⲛ ϫⲉ ⲡⲣⲱⲙⲉ <text:line-break/><text:span text:style-name="T1"> </text:span><text:span text:style-name="T2">(104/2) </text:span> ⲁⲩⲱ ⲡϣⲏⲣⲉ ⲙ̅ⲡⲣⲱⲙⲉ ⲡⲉⲉⲓ‐ <text:line-break/><text:span text:style-name="T1"> </text:span><text:span text:style-name="T2">(104/3) </text:span> ϣⲏⲣⲉ ϭⲉ ⲟⲩⲉⲃⲟⲗ ϩⲛ̅ ⲛⲓⲙ ⲙ̅‐ <text:line-break/><text:span text:style-name="T1"> </text:span><text:span text:style-name="T2">(104/4) </text:span> ⲙⲟⲟⲩ ⲡⲉ ⲡⲉϫⲁϥ ⲛⲁϥ ⲛ̅ϭⲓ <text:line-break/><text:span text:style-name="T1"> </text:span><text:span text:style-name="T2">(104/5) </text:span> ⲡⲉⲧⲟⲩⲁⲁⲃ· ϫⲉ ϯⲟⲩⲱϣ· ⲉⲧⲣⲉ‐ <text:line-break/><text:span text:style-name="T1"> </text:span><text:span text:style-name="T2">(104/6) </text:span> ⲧⲛ̅ⲉⲓⲙⲉ ϫⲉ ⲡⲉϩⲟⲩⲉⲓⲧ%6 ⲛ̅ⲣⲱ‐ <text:line-break/><text:span text:style-name="T1"> </text:span><text:span text:style-name="T2">(104/7) </text:span> ⲙⲉ ϣⲁⲩⲙⲟⲩⲧⲉ ⲉⲣⲟϥ ϫⲉ <text:line-break/><text:span text:style-name="T1"> </text:span><text:span text:style-name="T2">(104/8) </text:span> ⲡⲣⲉϥϫⲡⲟ ⲡⲛⲟⲩⲥ ⲉⲧϫⲏⲕ <text:line-break/><text:span text:style-name="T1"> </text:span><text:span text:style-name="T2">(104/9) </text:span> ⲉⲃⲟⲗ ϩⲓⲧⲟⲟⲧϥ̅ ⲙ̅ⲙⲓⲛ ⲙ̅ⲙⲟϥ <text:line-break/><text:span text:style-name="T1"> </text:span><text:span text:style-name="T2">(104/10) </text:span> ⲡⲁⲓ̈ ⲁϥⲉⲛⲑⲩⲙⲉⲓ ⲙⲛ̅ ⲧⲛⲟϭ ⲛ̅‐ <text:line-break/><text:span text:style-name="T1"> </text:span><text:span text:style-name="T2">(104/11) </text:span> ⲥⲟⲫⲓⲁ ⲧⲉϥⲥⲩⲛⲍⲩⲅⲟⲥ ⲁϥⲟⲩ‐ <text:line-break/><text:span text:style-name="T1"> </text:span><text:span text:style-name="T2">(104/12) </text:span> ⲱⲛϩ ⲉⲃⲟⲗ ⲙ̅ⲡⲉϥϣⲟⲣⲡ%6 ⲛ̅ϫⲡⲟ <text:line-break/><text:span text:style-name="T1"> </text:span><text:span text:style-name="T2">(104/13) </text:span> ⲛ̅ϣⲏⲣⲉ ⲛ̅ϩⲟⲟⲩⲧ%6ⲥϩⲓⲙⲉ ⲡⲉϥ‐ <text:line-break/><text:span text:style-name="T1"> </text:span><text:span text:style-name="T2">(104/14) </text:span> ⲣⲁⲛ ⲛ̅ϩⲟⲟⲩⲧ%6 ϣⲁⲩⲙⲟⲩⲧⲉ ⲉ‐ <text:line-break/><text:span text:style-name="T1"> </text:span><text:span text:style-name="T2">(104/15) </text:span> ⲣⲟϥ ϫⲉ ⲡⲣⲱⲧⲟⲅⲉⲛⲉⲧⲱⲣ· ⲛ̅‐ <text:line-break/><text:soft-page-break/><text:span text:style-name="T1"> </text:span><text:span text:style-name="T2">(104/16) </text:span> ϣⲏⲣⲉ ⲙ̅ⲡⲛⲟⲩⲧⲉ· ⲡⲉϥⲣⲁⲛ <text:line-break/><text:span text:style-name="T1"> </text:span><text:span text:style-name="T2">(104/17) </text:span> ⲛ̅ⲥϩⲓⲙⲉ ⲧⲥⲟⲫⲓⲁ ⲛ̅ⲡⲣⲱⲧⲟ‐ <text:line-break/><text:span text:style-name="T1"> </text:span><text:span text:style-name="T2">(104/18) </text:span> ⲅⲉⲛⲉⲧⲓⲣⲁ ⲧⲙⲁⲁⲩ ⲙ̅ⲡⲧⲏⲣϥ̅· <text:line-break/><text:span text:style-name="T1"> </text:span><text:span text:style-name="T2">(104/19) </text:span> ϣⲁⲣⲉϩⲟⲉⲓⲛⲉ ⲙⲟⲩⲧⲉ ⲉⲣⲟⲥ <text:line-break/><text:span text:style-name="T1"> </text:span><text:span text:style-name="T2">(104/20) </text:span> ϫⲉ ⲧⲁⲅⲁⲡⲏ· ⲛ̅ⲧⲟϥ ⲇⲉ ⲡϣⲟⲣⲡ%6 <text:line-break/><text:span text:style-name="T1"> </text:span><text:span text:style-name="T2">(104/21) </text:span> ⲛ̅ϫⲡⲟ ϣⲁⲩⲙⲟⲩⲧⲉ ⲉⲣⲟϥ ϫⲉ <text:line-break/><text:span text:style-name="T1"> </text:span><text:span text:style-name="T2">(104/22) </text:span> ⲡⲉⲭ̅ⲣ̅ⲥ̅ ⲉⲩⲛ̅ⲧⲁϥ ⲛ̅ⲧⲉⲝⲟⲩⲥⲓⲁ <text:line-break/><text:span text:style-name="T1"> </text:span><text:span text:style-name="T2">(104/23) </text:span> ϩⲓⲧⲙ̅ ⲡⲉϥⲉⲓⲱⲧ%6 ⲁϥⲧⲁⲙⲓⲟ <text:line-break/><text:span text:style-name="T1"> </text:span><text:span text:style-name="T2">(104/24) </text:span> ⲛⲁϥ ⲛ̅ⲟⲩⲙⲏⲏϣⲉ ⲛ̅ⲁⲅ%3ⲅⲉ‐ <text:line-break/><text:span text:style-name="T1"> </text:span><text:span text:style-name="T2">(105/1) </text:span> ⲗⲟⲥ ⲉⲙⲛ̅ⲧⲟⲩ ⲏⲡⲉ ⲉⲩϩⲩⲡⲏ‐ <text:line-break/><text:span text:style-name="T1"> </text:span><text:span text:style-name="T2">(105/2) </text:span> ⲣⲉⲥⲓⲁ ⲉⲃⲟⲗ ϩⲙ̅ ⲡⲉⲡ̅ⲛ̅ⲁ̅ ⲙⲛ̅ ⲡⲟⲩ‐ <text:line-break/><text:span text:style-name="T1"> </text:span><text:span text:style-name="T2">(105/3) </text:span> ⲟⲉⲓⲛ· ⲡⲉϫⲁⲩ ⲛⲁϥ ⲛ̅ϭⲓ ⲛⲉϥⲙⲁ‐ <text:line-break/><text:span text:style-name="T1"> </text:span><text:span text:style-name="T2">(105/4) </text:span> ⲑⲏⲧⲏⲥ ϫⲉ ⲡϫⲟⲉⲓⲥ ⲡⲉⲧⲉϣⲁⲩ‐ <text:line-break/><text:span text:style-name="T1"> </text:span><text:span text:style-name="T2">(105/5) </text:span> ⲙⲟⲩⲧⲉ ⲉⲣⲟϥ ϫⲉ ⲡⲣⲱⲙⲉ· ⲟⲩ‐ <text:line-break/><text:span text:style-name="T1"> </text:span><text:span text:style-name="T2">(105/6) </text:span> ⲱⲛϩ ⲛⲁⲛ ⲉⲧⲃⲏⲏⲧϥ̅· ϫⲉⲕⲁⲁⲥ <text:line-break/><text:span text:style-name="T1"> </text:span><text:span text:style-name="T2">(105/7) </text:span> ϩⲱⲱⲛ ⲉⲛⲁⲉⲓⲙⲉ ⲁⲕⲣⲓⲃⲱⲥ ⲉ‐ <text:line-break/><text:span text:style-name="T1"> </text:span><text:span text:style-name="T2">(105/8) </text:span> ⲧⲃⲉ ⲡⲉϥⲉⲟⲟⲩ ⲡⲉϫⲁϥ ⲛ̅→ϭⲓ← ⲡⲧⲉ‐ <text:line-break/><text:span text:style-name="T1"> </text:span><text:span text:style-name="T2">(105/9) </text:span> ⲗⲓⲟⲥ ⲛ̅ⲥⲱⲧⲏⲣ· ϫⲉ ⲡⲉⲧⲉ ⲟⲩⲛⲧϥ̅ <text:line-break/><text:span text:style-name="T1"> </text:span><text:span text:style-name="T2">(105/10) </text:span> ⲙⲁⲁϫⲉ ⲙ̅ⲙⲁⲩ ⲉⲥⲱⲧⲙ̅ ⲙⲁⲣⲉϥ‐ <text:line-break/><text:span text:style-name="T1"> </text:span><text:span text:style-name="T2">(105/11) </text:span> ⲥⲱⲧⲙ̅· ⲡⲉⲡⲣⲱⲧⲟⲅⲉⲛⲉⲧⲱⲣ ⲛ̅‐ <text:line-break/><text:span text:style-name="T1"> </text:span><text:span text:style-name="T2">(105/12) </text:span> ⲉⲓⲱⲧ%6 ⲉϣⲁⲩϫⲟⲟⲥ ⲉⲣⲟϥ ϫⲉ ⲁⲇⲁⲙ· <text:line-break/><text:span text:style-name="T1"> </text:span><text:span text:style-name="T2">(105/13) </text:span> [ⲡ]ⲃⲁⲗ ⲙ̅ⲡⲟⲩⲟⲉⲓⲛ ϫⲉ ⲛ̅ⲧⲁϥⲉⲓ ⲉ‐ <text:line-break/><text:span text:style-name="T1"> </text:span><text:span text:style-name="T2">(105/14) </text:span> [ⲃⲟ]ⲗ̣ ϩⲙ̅ ⲡⲟⲩⲟⲉⲓⲛ ⲉⲧⲣ̅ ⲟⲩⲟⲉⲓⲛ <text:line-break/><text:span text:style-name="T1"> </text:span><text:span text:style-name="T2">(105/15) </text:span> [ⲙⲛ̅] ⲛⲉϥⲁⲅ%6ⲅⲉⲗⲟⲥ ⲉⲧⲟⲩⲁⲁⲃ· ⲛ̅‐ <text:line-break/><text:span text:style-name="T1"> </text:span><text:span text:style-name="T2">(105/16) </text:span> ⲁⲧ%6ϣⲁϫⲉ ⲉⲣⲟⲟⲩ ⲛ̅ⲁⲧϩⲁⲉⲓⲃⲉⲥ <text:line-break/><text:span text:style-name="T1"> </text:span><text:span text:style-name="T2">(105/17) </text:span> ⲉⲩⲧⲉⲣⲡⲏ ⲉⲩⲙⲏⲛ ⲉⲃⲟⲗ ⲉⲩⲣⲁ‐ <text:line-break/><text:span text:style-name="T1"> </text:span><text:span text:style-name="T2">(105/18) </text:span> ϣⲉ ϩⲛ̅ ⲧⲉⲩⲉⲛⲑⲩⲙⲏⲥⲓⲥ ⲛ̅ⲧⲁⲩ‐ <text:line-break/><text:span text:style-name="T1"> </text:span><text:span text:style-name="T2">(105/19) </text:span> ϫⲓⲧ̅ⲥ̅ ⲛ̅ⲧⲛ̅ ⲡⲉⲩⲉⲓⲱⲧ%6 ⲧⲙⲛ̅ⲧⲣ̅‐ <text:line-break/><text:span text:style-name="T1"> </text:span><text:span text:style-name="T2">(105/20) </text:span> ⲣⲟ ⲧⲏⲣⲥ̅ ⲙ̅ⲡϣⲏⲣⲉ ⲙ̅ⲡⲣⲱⲙⲉ <text:line-break/><text:span text:style-name="T1"> </text:span><text:span text:style-name="T2">(105/21) </text:span> ⲡⲉⲧⲉϣⲁⲩⲙⲟⲩⲧⲉ ⲉⲣⲟϥ ϫⲉ ⲡ‐ <text:line-break/><text:span text:style-name="T1"> </text:span><text:span text:style-name="T2">(105/22) </text:span> ϣⲏⲣⲉ ⲙ̅ⲡⲛⲟⲩⲧⲉ ⲉ〈ⲥ〉ⲙⲏϩ ⲛ̅ⲣⲁ‐ <text:line-break/><text:span text:style-name="T1"> </text:span><text:span text:style-name="T2">(105/23) </text:span> ϣⲉ ⲛ̅ⲁⲧϣⲁϫⲉ ⲉⲣⲟϥ ⲛ̅ⲁⲧϩⲁⲉⲓⲃⲉⲥ <text:line-break/><text:span text:style-name="T1"> </text:span><text:span text:style-name="T2">(105/24) </text:span> ϩⲓ ⲧⲉⲗⲏⲗ ⲉⲙⲉϥϣⲓⲃⲉ ⲉⲩⲣⲟⲟⲩⲧ%6 <text:line-break/><text:span text:style-name="T1"> </text:span><text:span text:style-name="T2">(105/25) </text:span> ⲉϩⲣⲁⲓ̈ ⲉϫⲙ̅ ⲡⲉϥⲉⲟⲟⲩ ⲛ̅ⲁⲧ%6ⲧⲁⲕⲟ <text:line-break/><text:span text:style-name="T1"> </text:span><text:span text:style-name="T2">(106/1) </text:span> ⲉⲧⲉ ⲙ̅ⲡⲟⲩⲥⲟⲧⲙⲉϥ ⲉⲛⲉϩ ϣⲁ <text:line-break/><text:span text:style-name="T1"> </text:span><text:span text:style-name="T2">(106/2) </text:span> ⲧⲉⲛⲟⲩ ⲟⲩⲇⲉ ⲙ̅ⲡⲉϥⲟⲩⲱⲛϩ <text:line-break/><text:span text:style-name="T1"> </text:span><text:span text:style-name="T2">(106/3) </text:span> ⲉⲃⲟⲗ ϩⲛ̅ ⲛⲁⲓⲱⲛ ⲛ̅ⲧⲁⲩϣⲱⲡⲉ <text:line-break/><text:span text:style-name="T1"> </text:span><text:span text:style-name="T2">(106/4) </text:span> ⲙⲛ̅ⲛ̅ⲥⲁ ⲛⲁⲓ̈ ⲙⲛ̅ ⲛⲉⲩⲕⲟⲥⲙⲟⲥ· <text:line-break/><text:span text:style-name="T1"> </text:span><text:span text:style-name="T2">(106/5) </text:span> ⲁⲛⲟⲕ ⲛ̅ⲧⲁⲉⲓ{ⲉ̅ⲓ} ⲉⲃⲟⲗ ϩⲓⲧⲛ̅ ⲡⲁⲩ‐ <text:line-break/><text:span text:style-name="T1"> </text:span><text:span text:style-name="T2">(106/6) </text:span> ⲧⲟⲅⲉⲛⲏⲥ ⲙⲛ̅ ⲡⲉϩⲟⲩⲉⲓⲧ%6 ⲛ̅‐ <text:line-break/><text:span text:style-name="T1"> </text:span><text:span text:style-name="T2">(106/7) </text:span> ⲟⲩⲟⲉⲓⲛ ⲉⲧⲉ ⲙⲛ̅ ⲁⲣⲏϫϥ̅· ϫⲉ <text:line-break/><text:span text:style-name="T1"> </text:span><text:span text:style-name="T2">(106/8) </text:span> ⲉⲉⲓⲉⲙⲏⲛⲉⲩⲉ ⲛⲏⲧⲛ̅ ⲛ̅ⲛ̅ⲕⲁ <text:line-break/><text:span text:style-name="T1"> </text:span><text:span text:style-name="T2">(106/9) </text:span> ⲛⲓⲙ· ⲡⲁⲗⲓⲛ ⲛⲉϥⲙⲁⲑⲏⲧⲏⲥ <text:line-break/><text:span text:style-name="T1"> </text:span><text:span text:style-name="T2">(106/10) </text:span> ⲡⲉϫⲁⲩ ϫⲉ ⲙⲁⲧⲁⲙⲟⲛ ϩⲛ̅ ⲟⲩ‐ <text:line-break/><text:span text:style-name="T1"> </text:span><text:span text:style-name="T2">(106/11) </text:span> ⲱⲛϩ ⲉⲃⲟⲗ ϫⲉ ⲡⲱⲥ ⲉⲃⲟⲗ ϩⲛ̅ ⲛⲓ‐ <text:line-break/><text:span text:style-name="T1"> </text:span><text:span text:style-name="T2">(106/12) </text:span> ⲁⲧⲟⲱⲛϩ ⲉⲃⲟⲗ ⲁϥⲉⲓ ⲉⲡⲉⲥⲏⲧ <text:line-break/><text:span text:style-name="T1"> </text:span><text:span text:style-name="T2">(106/13) </text:span> ϩⲓⲧⲛ̅ ⲡⲓⲁⲑⲁⲛⲁⲧⲟⲥ ⲉⲡⲕⲟⲥ‐ <text:line-break/><text:soft-page-break/><text:span text:style-name="T1"> </text:span><text:span text:style-name="T2">(106/14) </text:span> ⲙⲟⲥ ⲉϣⲁ〈ϥ〉ⲙⲟⲩ ⲡⲉϫⲉ ⲡⲧⲉ‐ <text:line-break/><text:span text:style-name="T1"> </text:span><text:span text:style-name="T2">(106/15) </text:span> ⲗⲓⲟⲥ ⲛ̅ⲥⲱⲧⲏⲣ· ϫⲉ ⲧϣⲏⲣⲉ ⲙ̣̅‐ <text:line-break/><text:span text:style-name="T1"> </text:span><text:span text:style-name="T2">(106/16) </text:span> ⲡⲣⲱⲙⲉ ⲁϥϥⲓ ⲙⲛ̅ ⲧⲥⲟⲫⲓⲁ ⲧⲉϥ‐ <text:line-break/><text:span text:style-name="T1"> </text:span><text:span text:style-name="T2">(106/17) </text:span> ⲥⲩⲛⲍⲩⲅⲟⲥ ⲁϥⲟⲩⲱⲛϩ ⲉⲃⲟⲗ ⲛ̅‐ <text:line-break/><text:span text:style-name="T1"> </text:span><text:span text:style-name="T2">(106/18) </text:span> ⲟⲩⲛⲟϭ ⲛ̅ⲟⲩⲟⲉⲓⲛ ⲛ̅ϩⲟⲟⲩⲧ%6 <text:line-break/><text:span text:style-name="T1"> </text:span><text:span text:style-name="T2">(106/19) </text:span> ⲥϩⲓⲙⲉ· ⲡⲉϥⲣⲁⲛ ⲛ̅ϩⲟⲟⲩⲧ%6 <text:line-break/><text:span text:style-name="T1"> </text:span><text:span text:style-name="T2">(106/20) </text:span> ϣⲁⲩⲙⲟⲩⲧⲉ ⲉⲣⲟϥ ϫⲉ ⲡⲥⲱ‐ <text:line-break/><text:span text:style-name="T1"> </text:span><text:span text:style-name="T2">(106/21) </text:span> ⲧⲏⲣ ⲡⲣⲉϥϫⲡⲉ ⲛ̅ⲕⲁ ⲛⲓⲙ· ⲡⲉϥ‐ <text:line-break/><text:span text:style-name="T1"> </text:span><text:span text:style-name="T2">(106/22) </text:span> ⲣⲁⲛ ⲛ̅ⲥϩⲓⲙⲉ ⲡⲉ ⲡⲁⲛⲅⲉⲛⲉⲧⲓ‐ <text:line-break/><text:span text:style-name="T1"> </text:span><text:span text:style-name="T2">(106/23) </text:span> ⲣⲁ ⲥⲟⲫⲓⲁ ϣⲁⲣⲉϩⲟⲉⲓⲛ ⲙⲟⲩⲧⲉ <text:line-break/><text:span text:style-name="T1"> </text:span><text:span text:style-name="T2">(106/24) </text:span> ⲉⲣⲟⲥ ϫⲉ ⲧⲡⲓⲥⲧⲓⲥ ⲛⲉⲧⲛⲏⲟⲩ <text:line-break/><text:span text:style-name="T1"> </text:span><text:span text:style-name="T2">(106/25) </text:span> ⲧⲏⲣⲟⲩ ⲉϩⲟⲩⲛ ⲉⲡⲕⲟⲥⲙⲟⲥ ⲛ̅‐ <text:line-break/><text:span text:style-name="T1"> </text:span><text:span text:style-name="T2">(107/1) </text:span> ⲑⲉ ⲛ̅ⲟⲩⲧⲗ̅ϯⲗⲉ ⲉⲃⲟⲗ ϩⲙ̅ ⲡⲟⲩⲟⲉⲓⲛ <text:line-break/><text:span text:style-name="T1"> </text:span><text:span text:style-name="T2">(107/2) </text:span> ⲉⲃⲟⲗ ϩⲓⲧⲟⲟⲧϥ̅ ⲙ̅ⲡⲁⲓ̈ ⲉⲩⲧⲛ̅ⲛⲟ‐ <text:line-break/><text:span text:style-name="T1"> </text:span><text:span text:style-name="T2">(107/3) </text:span> ⲟⲩ ⲙ̅ⲙⲟⲟⲩ ⲉⲡⲕⲟⲥⲙⲟⲥ ⲙ̅ⲡ%6ⲡⲁⲛ‐ <text:line-break/><text:span text:style-name="T1"> </text:span><text:span text:style-name="T2">(107/4) </text:span> ⲧⲟⲕⲣⲁⲧⲱⲣ· ϫⲉ ⲉⲩⲉϩⲁⲣⲏϩ ⲉⲣⲟⲟⲩ <text:line-break/><text:span text:style-name="T1"> </text:span><text:span text:style-name="T2">(107/5) </text:span> ⲉⲃⲟⲗ ϩⲓⲧⲟⲟⲧϥ̅· ⲁⲩⲱ ⲁⲡⲥⲱⲛϩ ⲛ̅‐ <text:line-break/><text:span text:style-name="T1"> </text:span><text:span text:style-name="T2">(107/6) </text:span> ⲧⲉϥⲃ̅ϣⲉ ⲙⲟⲣϥ̅· ϩⲙ̅ ⲡⲉⲧⲉϩⲛⲉⲥ· <text:line-break/><text:span text:style-name="T1"> </text:span><text:span text:style-name="T2">(107/7) </text:span> ⲛ̅ⲧⲥⲟⲫⲓⲁ ϫⲉ ⲉⲣⲉⲡϩⲱⲃ 〈ⲛⲁⲟⲩⲱⲛϩ〉 ⲉⲃⲟⲗ ϩⲓ‐ <text:line-break/><text:span text:style-name="T1"> </text:span><text:span text:style-name="T2">(107/8) </text:span> ⲧⲟⲟⲧϥ̅ ⲙ̅ⲡⲕⲟⲥⲙⲟⲥ ⲧⲏⲣϥ̅ ⲛ̅ⲧⲙ̅ⲛ〈ⲧ〉‐ <text:line-break/><text:span text:style-name="T1"> </text:span><text:span text:style-name="T2">(107/9) </text:span> ϩⲏⲕⲉ ⲉⲧⲃⲉ ⲧⲉϥⲙⲛ̅ⲧϫⲁⲥⲓ ϩⲏⲧ%3 <text:line-break/><text:span text:style-name="T1"> </text:span><text:span text:style-name="T2">(107/10) </text:span> ⲙⲛ̅ ⲧⲉϥⲙⲛ̅ⲧⲃ̅ⲗⲗⲉ· ⲙⲛ̅ ⲧⲙⲛⲧ%3ⲁ‐ <text:line-break/><text:span text:style-name="T1"> </text:span><text:span text:style-name="T2">(107/11) </text:span> ⲧⲥⲟⲟⲩⲛ ϫⲉ ⲁ〈ⲩ〉ϯ ⲣⲁⲛ ⲉⲣⲟϥ· ⲁⲛⲟⲕ <text:line-break/><text:span text:style-name="T1"> </text:span><text:span text:style-name="T2">(107/12) </text:span> ⲇⲉ ⲛ̅ⲧⲁⲉⲓ{ⲉ̅ⲓ} ⲉⲃⲟⲗ ϩⲛ̅ ⲛ̅ⲧⲟⲡⲟⲥ ⲙ̅‐ <text:line-break/><text:span text:style-name="T1"> </text:span><text:span text:style-name="T2">(107/13) </text:span> [ⲡ]ⲥ̣ⲁϩⲣⲉ· ϩⲙ̅ ⲡⲉⲧⲉϩⲛⲉϥ ⲙ̅ⲡⲓⲛⲟϭ <text:line-break/><text:span text:style-name="T1"> </text:span><text:span text:style-name="T2">(107/14) </text:span> [ⲛ̅ⲟ]ⲩⲟⲉⲓⲛ ⲛ̅ⲧⲁϩ{ⲉ̅ⲓ} ⲉⲃⲟⲗ ϩⲙ̅ ⲡⲥⲱⲛϩ <text:line-break/><text:span text:style-name="T1"> </text:span><text:span text:style-name="T2">(107/15) </text:span> [ⲉⲧ]ⲙ̣̅ⲙⲁⲩ ⲁⲉⲓⲥⲱⲗⲡ%6 ⲙ̅ⲫⲱⲃ ⲛ̅ⲛ̅‐ <text:line-break/><text:span text:style-name="T1"> </text:span><text:span text:style-name="T2">(107/16) </text:span> [ⲥ]ⲟ̣ⲟⲛⲉ ⲁⲉⲓⲧⲟⲩⲛⲟⲥϥ̅ ϫⲉⲕⲁⲁⲥ ⲉϥ‐ <text:line-break/><text:span text:style-name="T1"> </text:span><text:span text:style-name="T2">(107/17) </text:span> ⲛⲁϯ ⲕⲁⲣⲡⲟⲥ ⲉⲛⲁϣⲱϥ ⲉⲃⲟⲗ <text:line-break/><text:span text:style-name="T1"> </text:span><text:span text:style-name="T2">(107/18) </text:span> [ϩ]ⲓ̣ⲧⲟⲟⲧ%6 ⲛ̅ϭⲓ ⲡⲓⲧⲗ̅ϯⲗⲉ ⲉⲧⲙ̅ⲙⲁⲩ <text:line-break/><text:span text:style-name="T1"> </text:span><text:span text:style-name="T2">(107/19) </text:span> ⲡⲉⲛⲧⲁⲩⲧⲛ̅ⲛⲟⲟⲩϥ ϩⲓⲧⲛ̅ ⲧⲥⲟⲫⲓⲁ <text:line-break/><text:span text:style-name="T1"> </text:span><text:span text:style-name="T2">(107/20) </text:span> ⲉϥⲉϫⲱⲕ ⲉⲃⲟⲗ ⲁⲩⲱ ⲛ̅ⲛⲉϥϣⲱⲱⲧ <text:line-break/><text:span text:style-name="T1"> </text:span><text:span text:style-name="T2">(107/21) </text:span> ϭⲉ· ⲁⲗⲗⲁ ⲉⲩⲛⲁⲛⲟϩ〈ⲃ〉ϥ ⲉⲃⲟⲗ ϩⲓⲧⲟ‐ <text:line-break/><text:span text:style-name="T1"> </text:span><text:span text:style-name="T2">(107/22) </text:span> ⲟⲧ%6 ⲡⲛⲟϭ ⲛ̅ⲥⲱⲧⲏⲣ ϫⲉ ⲉⲣⲉⲡⲉϥ‐ <text:line-break/><text:span text:style-name="T1"> </text:span><text:span text:style-name="T2">(107/23) </text:span> ⲉⲟⲟⲩ ⲛⲁⲟⲩⲱⲛϩ ⲉⲃⲟⲗ· ϫⲉⲕⲁⲁⲥ <text:line-break/><text:span text:style-name="T1"> </text:span><text:span text:style-name="T2">(107/24) </text:span> ⲉⲩⲛⲁⲧⲙⲁⲉⲓⲉ ⲧⲕⲉⲥⲟⲫⲓⲁ ⲉⲃⲟⲗ ϩⲙ̅ <text:line-break/><text:span text:style-name="T1"> </text:span><text:span text:style-name="T2">(107/25) </text:span> ⲡⲉϭⲣⲱϩ ⲉⲧⲙ̅ⲙⲁⲩ ϫⲉ ⲛ̅ⲛⲉⲛⲉⲥ‐ <text:line-break/><text:span text:style-name="T1"> </text:span><text:span text:style-name="T2">(108/1) </text:span> ϣⲏⲣⲉ ϭⲉ ϣⲱⲡⲉ ⲛ̅ϣⲧⲁ ⲁⲗⲗⲁ <text:line-break/><text:span text:style-name="T1"> </text:span><text:span text:style-name="T2">(108/2) </text:span> ⲉⲩⲛⲁϯ ⲙⲁⲧⲉ ϩⲛ̅ ⲧⲉⲧⲓⲙⲏ ⲙⲛ̅ <text:line-break/><text:span text:style-name="T1"> </text:span><text:span text:style-name="T2">(108/3) </text:span> ⲟⲩⲉⲟⲟⲩ ⲛ̅ⲥⲉⲃⲱⲕ ⲉϩⲣⲁⲓ̈ ϣⲁ ⲡⲉⲩ‐ <text:line-break/><text:span text:style-name="T1"> </text:span><text:span text:style-name="T2">(108/4) </text:span> ⲉⲓⲱⲧ%6 ⲛ̅ⲥⲉⲥⲟⲩⲛ̅ ⲛ̅ϣⲁϫⲉ ⲙ̅ⲡⲟⲩ‐ <text:line-break/><text:span text:style-name="T1"> </text:span><text:span text:style-name="T2">(108/5) </text:span> ⲟⲉⲓⲛ ⲙ̅ⲙⲛⲧ%6ϩⲟⲟⲩⲧ%6 ⲛ̅ⲧⲱⲧⲛ̅ ⲛ̅‐ <text:line-break/><text:span text:style-name="T1"> </text:span><text:span text:style-name="T2">(108/6) </text:span> ⲇⲉ ⲛ̅ⲧⲁⲩⲧⲛ̅ⲛⲟⲟⲩ ⲧⲏⲟⲩⲧⲛ̅ ϩⲓ‐ <text:line-break/><text:span text:style-name="T1"> </text:span><text:span text:style-name="T2">(108/7) </text:span> ⲧⲙ̅ ⲡϣⲏⲣⲉ ⲛ̅ⲧⲁⲩⲧⲛ̅ⲛⲟⲟⲩϥ· <text:line-break/><text:span text:style-name="T1"> </text:span><text:span text:style-name="T2">(108/8) </text:span> ϫⲉ ⲉⲧⲉⲧⲛⲁϫⲓ ⲟⲩⲟⲉⲓⲛ ⲛ̅ⲧⲉⲧⲛ̅·‐ <text:line-break/><text:span text:style-name="T1"> </text:span><text:span text:style-name="T2">(108/9) </text:span> ⲥⲁϩⲉ ⲧⲏⲛⲟⲩ ⲉⲃⲟⲗ ⲛ̅ⲧⲃ̅ϣⲉ ⲛ̅‐ <text:line-break/><text:span text:style-name="T1"> </text:span><text:span text:style-name="T2">(108/10) </text:span> ⲛⲉⲝⲟⲩⲥⲓⲁ ⲁⲩⲱ ⲛ̅ⲥⲧⲙ̅ⲟⲩⲱⲛϩ <text:line-break/><text:soft-page-break/><text:span text:style-name="T1"> </text:span><text:span text:style-name="T2">(108/11) </text:span> ϭⲉ ⲉⲧⲃⲉ ⲧⲏⲛⲟⲩ ⲛ̅ϭⲓ ⲧⲉⲧⲣⲓⲃⲏ <text:line-break/><text:span text:style-name="T1"> </text:span><text:span text:style-name="T2">(108/12) </text:span> ⲉⲧϫⲁϩⲙ̅ ⲧⲏ ⲉⲧⲉ ⲟⲩⲉⲃⲟⲗ ⲧⲉ <text:line-break/><text:span text:style-name="T1"> </text:span><text:span text:style-name="T2">(108/13) </text:span> ϩⲙ̅ ⲡⲉⲕⲣⲱⲙ· ⲉⲧϩⲁ ϩⲟⲧⲉ· ⲡⲉⲛ‐ <text:line-break/><text:span text:style-name="T1"> </text:span><text:span text:style-name="T2">(108/14) </text:span> ⲧⲁϥⲉⲓ ⲉⲃⲟⲗ ϩⲙ̅ ⲡⲥⲁⲣⲕⲓⲛⲟⲥ ⲙ̅‐ <text:line-break/><text:span text:style-name="T1"> </text:span><text:span text:style-name="T2">(108/15) </text:span> ⲙⲟⲟⲩ ϩⲱⲙ· ⲉϩⲣⲁⲓ̈ ⲉϫⲛ̅ ⲧⲉⲩ‐ <text:line-break/><text:span text:style-name="T1"> </text:span><text:span text:style-name="T2">(108/16) </text:span> ⲡⲣⲟⲛⲟⲓⲁ· ⲧⲟⲧⲉ ⲡⲉϫⲁϥ ⲛⲁ[ϥ] <text:line-break/><text:span text:style-name="T1"> </text:span><text:span text:style-name="T2">(108/17) </text:span> ⲛ̅ϭⲓ ⲑⲱⲙⲁⲥ ϫⲉ ⲡϫⲟⲉⲓⲥ ⲡⲥⲱ‐ <text:line-break/><text:span text:style-name="T1"> </text:span><text:span text:style-name="T2">(108/18) </text:span> ⲧⲏⲣ ⲛⲉⲧⲟⲩⲁⲧⲃ̅ ⲉⲛⲡⲏⲟⲩⲉ ⲟⲩ‐ <text:line-break/><text:span text:style-name="T1"> </text:span><text:span text:style-name="T2">(108/19) </text:span> ⲏⲣ ⲛⲉ· ⲛⲉⲩⲁⲓⲱⲛ· ⲡⲉϫⲉ ⲡⲧⲉ‐ <text:line-break/><text:span text:style-name="T1"> </text:span><text:span text:style-name="T2">(108/20) </text:span> ⲗⲓⲟⲥ ⲛ̅ⲥⲱⲧⲏⲣ· ϫⲉ ϯⲉⲡⲁⲓⲛⲟⲩ <text:line-break/><text:span text:style-name="T1"> </text:span><text:span text:style-name="T2">(108/21) </text:span> ⲙ̅ⲙⲱⲧⲛ̅ ϫⲉ ⲧⲉⲧⲛ̅ϣⲓⲛⲉ ⲛ̅ⲥⲁ <text:line-break/><text:span text:style-name="T1"> </text:span><text:span text:style-name="T2">(108/22) </text:span> ⲛⲓⲛⲟϭ ⲛ̅ⲁⲓⲱⲛ ϫⲉ ⲛⲉⲧⲛ̅ⲛⲟⲩ‐ <text:line-break/><text:span text:style-name="T1"> </text:span><text:span text:style-name="T2">(108/23) </text:span> ⲛⲉ ⲉⲩϩⲛ̅ ⲛⲓⲁⲡⲉⲣⲁⲛⲧⲟⲛ ⲛ̅ⲧⲉ‐ <text:line-break/><text:span text:style-name="T1"> </text:span><text:span text:style-name="T2">(108/24) </text:span> ⲣⲟⲩⲱⲛϩ ⲇⲉ ⲛ̅ϭⲓ ⲛⲏ ⲛ̅ⲧⲁⲉⲓ‐ <text:line-break/><text:span text:style-name="T1"> </text:span><text:span text:style-name="T2">(108/25) </text:span> ϣⲁϫⲉ ⲉⲣⲟⲟⲩ ⲛ̅ϣⲟⲣⲡ%6 ⲁϥⲧⲥⲁ[ⲛⲟ] <text:line-break/><text:span text:style-name="T1"> </text:span><text:span text:style-name="T2">(111/1) </text:span> ⲛ̅ⲥⲉ{ⲉ̅ⲓ} ⲉⲩⲙ̅ⲛ̅ⲧⲟⲩⲁ· ϣⲁⲛⲙⲟⲩ‐ <text:line-break/><text:span text:style-name="T1"> </text:span><text:span text:style-name="T2">(111/2) </text:span> ⲧⲉ ⲉⲣⲟⲟⲩ ϫⲉ ⲧⲉⲕⲕⲗⲏⲥⲓⲁ ⲛ̅ⲧⲉ <text:line-break/><text:span text:style-name="T1"> </text:span><text:span text:style-name="T2">(111/3) </text:span> ⲧⲙⲉϩϣⲙⲟⲩⲛⲉ· ⲁⲥⲟⲩⲱⲛϩ ⲉ‐ <text:line-break/><text:span text:style-name="T1"> </text:span><text:span text:style-name="T2">(111/4) </text:span> ⲃⲟⲗ ⲉⲩϩⲟⲟⲩⲧ%6ⲥϩⲓⲙⲉ ⲧⲉ· ⲁⲩϯ ⲣⲁⲛ <text:line-break/><text:span text:style-name="T1"> </text:span><text:span text:style-name="T2">(111/5) </text:span> ⲉⲣⲟⲥ ⲉⲕ ⲙⲉⲣⲟⲥ ⲛ̅ϩⲟⲟⲩⲧ%6 ⲁⲩⲱ <text:line-break/><text:span text:style-name="T1"> </text:span><text:span text:style-name="T2">(111/6) </text:span> ⲉⲕ ⲙⲉⲣⲟⲥ ⲛ̅ⲥϩⲓⲙⲉ· ⲫⲟⲟⲩⲧ%6 ⲙⲉⲛ <text:line-break/><text:span text:style-name="T1"> </text:span><text:span text:style-name="T2">(111/7) </text:span> ϣⲁⲩϯ ⲣⲛϥ ϫⲉ ⲧⲉⲕⲕⲗⲏⲥⲓⲁ· ⲧⲉ‐ <text:line-break/><text:span text:style-name="T1"> </text:span><text:span text:style-name="T2">(111/8) </text:span> ⲥϩⲓⲙⲉ ⲇⲉ ϣⲁⲩϯ ⲣⲛ̅ⲥ ϫⲉ ⲍⲱⲏ <text:line-break/><text:span text:style-name="T1"> </text:span><text:span text:style-name="T2">(111/9) </text:span> ϫⲉ ⲉϥⲛⲁⲟⲩⲱⲛϩ ⲉⲃⲟⲗ ϫⲉ ⲉⲃⲟⲗ <text:line-break/><text:span text:style-name="T1"> </text:span><text:span text:style-name="T2">(111/10) </text:span> ϩⲓⲧⲛ̅ ⲟⲩⲥϩⲓⲙⲉ ⲁⲡⲱⲛϩ ϣⲱⲡⲉ ⲛ̅‐ <text:line-break/><text:span text:style-name="T1"> </text:span><text:span text:style-name="T2">(111/11) </text:span> ⲛⲓⲁⲓⲱⲛ ⲧⲏⲣⲟⲩ ⲣⲁⲛ ⲇⲉ ⲛⲓⲙ ⲁⲩ‐ <text:line-break/><text:span text:style-name="T1"> </text:span><text:span text:style-name="T2">(111/12) </text:span> ϫⲓⲧⲟⲩ ϫⲓⲛ ⲛ̅ⲧⲁⲣⲭⲏ ⲉⲃⲟⲗ ⲅⲁⲣ ϩⲙ̅ <text:line-break/><text:span text:style-name="T1"> </text:span><text:span text:style-name="T2">(111/13) </text:span> ⲡⲉϥϫⲱⲛϥ ⲙⲛ̅ ⲧⲉϥⲉⲛⲛⲟⲓⲁ ⲁⲩⲟⲩ‐ <text:line-break/><text:span text:style-name="T1"> </text:span><text:span text:style-name="T2">(111/14) </text:span> ⲱ̣ⲛϩ ⲉⲃⲟⲗ ⲛ̅ϭⲓ ⲛ̅ϭⲟⲙ· ⲛ̅ϣⲟⲣⲡ%6 ⲛⲁⲓ̈ <text:line-break/><text:span text:style-name="T1"> </text:span><text:span text:style-name="T2">(111/15) </text:span> [ⲛ̅ⲧ]ⲁ̣ⲩϯ ⲣⲁⲛ ⲉⲣⲟⲟⲩ ϫⲉ ⲛⲟⲩⲧⲉ· <text:line-break/><text:span text:style-name="T1"> </text:span><text:span text:style-name="T2">(111/16) </text:span> [ⲛ̅]ⲛ̣ⲟⲩⲧⲉ ⲇⲉ ⲛ̅ⲛ̅ⲛⲟⲩⲧⲉ ⲉⲃⲟⲗ ϩⲛ̅ ⲧⲉⲩ‐ <text:line-break/><text:span text:style-name="T1"> </text:span><text:span text:style-name="T2">(111/17) </text:span> ⲙⲛ̅ⲧⲥⲁⲃⲉ ⲁⲩⲟⲩⲱⲛϩ ⲛ̅ϩⲉⲛⲛⲟⲩⲧⲉ <text:line-break/><text:span text:style-name="T1"> </text:span><text:span text:style-name="T2">(111/18) </text:span> ⲉⲃⲟⲗ· 〈ⲛ̅ⲛⲟⲩⲧⲉ ⲇⲉ〉 ϩⲛ̅ ⲧⲉⲩⲙⲛ̅ⲧⲥⲁⲃⲉ ⲁⲩⲟⲩⲱⲛϩ <text:line-break/><text:span text:style-name="T1"> </text:span><text:span text:style-name="T2">(111/19) </text:span> ⲛ̣̅ϩⲉⲛϫⲟⲉⲓⲥ ⲉⲃⲟⲗ· ⲛ̅ϫⲟⲉⲓⲥ ⲇⲉ ⲛ̅‐ <text:line-break/><text:span text:style-name="T1"> </text:span><text:span text:style-name="T2">(111/20) </text:span> [ⲛ̅]ϫⲟⲉⲓⲥ ⲁⲩⲟⲩⲱⲛϩ ⲉⲃⲟⲗ 〈ϩ〉ⲛ̅ ⲛⲉⲩⲙⲉ <text:line-break/><text:span text:style-name="T1"> </text:span><text:span text:style-name="T2">(111/21) </text:span> ⲟⲩⲉ ⲛ̅ϩⲉⲛϫⲟⲉⲓⲥ· ⲛ̅ϫⲟⲉⲓⲥ ⲇⲉ ϩⲛ̅ <text:line-break/><text:span text:style-name="T1"> </text:span><text:span text:style-name="T2">(111/22) </text:span> ⲧ̣ⲉⲩϭⲟⲙ ⲁⲩⲟⲩⲱⲛϩ ⲉⲃⲟⲗ ⲛ̅ϩⲉⲛⲁⲣ‐ <text:line-break/><text:span text:style-name="T1"> </text:span><text:span text:style-name="T2">(111/23) </text:span> [ⲭⲁ]ⲅ̣%3ⲅⲉⲗⲟⲥ· ⲛⲁⲣⲭⲁⲅʹ28ⲉⲗⲟⲥ ⲉⲃⲟⲗ <text:line-break/><text:span text:style-name="T1"> </text:span><text:span text:style-name="T2">(111/24) </text:span> [ϩ]ⲛ ⲛⲉⲩⲗⲟⲅⲟⲥ ⲁⲩⲟⲩⲱⲛϩ ⲉⲃⲟⲗ ⲛ̅‐ <text:line-break/><text:span text:style-name="T1"> </text:span><text:span text:style-name="T2">(112/1) </text:span> ϩⲉⲛⲁⲅ%3ⲅⲉⲗⲟⲥ ⲉⲃⲟⲗ ϩⲛ̅ ⲛⲁⲓ̈ ⲁϩⲉⲛ‐ <text:line-break/><text:span text:style-name="T1"> </text:span><text:span text:style-name="T2">(112/2) </text:span> ϩⲓⲇⲉⲁ ⲟⲩⲱⲛϩ ϩⲓ ⲥⲭⲏⲙⲁ ϩⲓ ⲙⲟⲣ‐ <text:line-break/><text:span text:style-name="T1"> </text:span><text:span text:style-name="T2">(112/3) </text:span> ⲫⲏ ϩⲓ ⲣⲁⲛ ⲉⲛⲓⲁⲓⲱⲛ ⲧⲏⲣⲟⲩ <text:line-break/><text:span text:style-name="T1"> </text:span><text:span text:style-name="T2">(112/4) </text:span> ⲙⲛ̅ ⲛⲉⲩⲕⲟⲥⲙⲟⲥ· ⲛ̅ⲁⲑⲁⲛⲁⲧⲟⲥ <text:line-break/><text:span text:style-name="T1"> </text:span><text:span text:style-name="T2">(112/5) </text:span> ⲇⲉ ⲛ̅ⲧⲁⲉⲓϫⲟⲟⲩ ⲛ̅ϣⲟⲣⲡ%6 ⲟⲩⲛ̅‐ <text:line-break/><text:span text:style-name="T1"> </text:span><text:span text:style-name="T2">(112/6) </text:span> ⲧⲁⲩ ⲉⲝⲟⲩⲥⲓⲁ ⲧⲏⲣⲟⲩ ⲉⲃⲟⲗ ϩⲙ̅ <text:line-break/><text:span text:style-name="T1"> </text:span><text:span text:style-name="T2">(112/7) </text:span> ⲡⲓⲁⲑⲁⲛⲁⲧⲟⲥ ⲛ̅ⲣⲱⲙⲉ †ⲡⲉⲧⲉ <text:line-break/><text:span text:style-name="T1"> </text:span><text:span text:style-name="T2">(112/8) </text:span> ϣⲁⲩⲙⲟⲩⲧⲉ ⲉⲣⲟϥ ϫⲉ ⲧⲥⲓⲅⲏ ϫⲉ <text:line-break/><text:soft-page-break/><text:span text:style-name="T1"> </text:span><text:span text:style-name="T2">(112/9) </text:span> ⲉⲃⲟⲗ ϩⲛ̅ ⲟⲩⲉⲛⲑⲩⲙⲏⲥⲓⲥ ⲁϫⲛ̅ <text:line-break/><text:span text:style-name="T1"> </text:span><text:span text:style-name="T2">(112/10) </text:span> ϣⲁϫⲉ ⲁⲥϫⲱⲕ ⲉⲃⲟⲗ ⲛ̅ϭⲓ ⲧⲉⲥ‐ <text:line-break/><text:span text:style-name="T1"> </text:span><text:span text:style-name="T2">(112/11) </text:span> ⲙⲛ̅ⲧⲛⲟϭ ⲧⲏⲣⲥ̅† ⲛ̅ⲁⲫⲑⲁⲣⲥⲓⲁ ⲉⲩ‐ <text:line-break/><text:span text:style-name="T1"> </text:span><text:span text:style-name="T2">(112/12) </text:span> ⲛ̅ⲧⲁⲩ ⲅⲁⲣ ⲛ̅ⲧⲉⲝⲟⲩⲥⲓⲁ ⲁⲩⲧⲁⲙⲓⲟ <text:line-break/><text:span text:style-name="T1"> </text:span><text:span text:style-name="T2">(112/13) </text:span> ⲛⲁⲩ ⲛ̅ⲟⲩⲛⲟϭ ⲛ̅ⲙⲛ̅ⲧⲣ̅ⲣⲟ ⲛ̅ϭⲓ <text:line-break/><text:span text:style-name="T1"> </text:span><text:span text:style-name="T2">(112/14) </text:span> ⲡⲟⲩⲁ ⲡⲟⲩⲁ ⲙ̅ⲙⲟⲟⲩ ϩⲛ̅ ⲧⲙⲉϩϣ‐ <text:line-break/><text:span text:style-name="T1"> </text:span><text:span text:style-name="T2">(112/15) </text:span> ⲙⲟⲩⲛⲉ· ⲁⲩⲱ ϩⲉⲛⲑⲣⲟⲛⲟⲥ ⲙ[ⲛ̅] <text:line-break/><text:span text:style-name="T1"> </text:span><text:span text:style-name="T2">(112/16) </text:span> ϩⲉⲛⲣ̅ⲡⲉ· ϩⲉⲛⲥⲧⲉⲣⲉⲱⲙⲁ ⲡⲣⲟⲥ̣ <text:line-break/><text:span text:style-name="T1"> </text:span><text:span text:style-name="T2">(112/17) </text:span> ⲛⲉⲩⲙⲛ̅ⲧⲛⲟϭ ⲛⲁⲓ̈ ⲅⲁⲣ ⲧⲏⲣⲟⲩ <text:line-break/><text:span text:style-name="T1"> </text:span><text:span text:style-name="T2">(112/18) </text:span> ⲁⲩϣⲱⲡⲉ ϩⲓⲧⲛ̅ ⲡⲉⲧⲉϩⲛⲉ <text:line-break/><text:span text:style-name="T1"> </text:span><text:span text:style-name="T2">(112/19) </text:span> ⲧⲙⲁⲁⲩ ⲙ̅ⲡⲧⲏⲣϥ· ⲧⲟⲧⲉ ⲛⲁ‐ <text:line-break/><text:span text:style-name="T1"> </text:span><text:span text:style-name="T2">(112/20) </text:span> ⲡⲟⲥⲟⲧⲟⲗⲟⲥ ⲉⲧⲟⲩⲁⲁⲃ ⲡⲉϫⲁⲩ <text:line-break/><text:span text:style-name="T1"> </text:span><text:span text:style-name="T2">(112/21) </text:span> ⲛⲁϥ ϫⲉ ⲡϫⲟⲉⲓⲥ ⲡⲥⲱⲧⲏⲣ· <text:line-break/><text:span text:style-name="T1"> </text:span><text:span text:style-name="T2">(112/22) </text:span> ⲁϫⲓ ⲛⲉⲧϩⲛ̅ ⲛⲓⲁⲓⲱⲛ ⲉⲣⲟⲛ ϫⲉ <text:line-break/><text:span text:style-name="T1"> </text:span><text:span text:style-name="T2">(112/23) </text:span> ⲧⲁⲛⲁⲅ%6ⲕⲏ ⲛⲁⲛ ⲧⲉ ⲉⲧⲣⲉⲛϣ[ⲓ]‐ <text:line-break/><text:span text:style-name="T1"> </text:span><text:span text:style-name="T2">(112/24) </text:span> ⲛⲉ ⲛ̅ⲥⲱⲟⲩ ⲡⲉϫⲉ ⲡⲧⲉⲗⲓⲟⲥ ⲛ̅‐ <text:line-break/><text:span text:style-name="T1"> </text:span><text:span text:style-name="T2">(113/1) </text:span> ⲥⲱⲧⲏⲣ ϫⲉ ⲉϣϫⲉ 〈ⲉ〉ⲧⲉⲧⲛ̅ϣⲓⲛⲉ <text:line-break/><text:span text:style-name="T1"> </text:span><text:span text:style-name="T2">(113/2) </text:span> ⲛ̅ⲥⲁ ϩⲱⲃ ⲛⲓⲙ· ϯⲛⲁϫⲟⲟⲩ ⲉⲣⲱⲧ̅ⲛ̅ <text:line-break/><text:span text:style-name="T1"> </text:span><text:span text:style-name="T2">(113/3) </text:span> ⲁⲩⲧⲁⲙⲓⲟ ⲛⲁⲩ ⲛ̅ϩⲉⲛⲥⲧⲣⲁⲧⲓⲁ ⲛ̅‐ <text:line-break/><text:span text:style-name="T1"> </text:span><text:span text:style-name="T2">(113/4) </text:span> ⲁⲅ%3ⲅⲉⲗⲟⲥ ϩⲉⲛⲧⲃⲁ ⲉⲙⲛ̅ⲧⲟⲩ ⲏⲡⲉ <text:line-break/><text:span text:style-name="T1"> </text:span><text:span text:style-name="T2">(113/5) </text:span> ⲉⲩϣⲙ̅ϣⲉ ⲙⲛ̅ ⲛⲉⲩⲉⲟⲟⲩ ⲁⲩⲧⲁ‐ <text:line-break/><text:span text:style-name="T1"> </text:span><text:span text:style-name="T2">(113/6) </text:span> ⲙⲓⲟ ⲛ̅ϩⲉⲛⲡⲁⲣⲑⲉⲛⲟⲥ ⲙ̅ⲡ̅ⲛ̅ⲁ̅ ⲛ̅‐ <text:line-break/><text:span text:style-name="T1"> </text:span><text:span text:style-name="T2">(113/7) </text:span> ⲟⲩⲟⲉⲓⲛ ⲛ̅ⲁⲧϣⲁϫⲉ ⲉⲣⲟⲟⲩ ⲛ̅ⲁ〈ⲧ〉‐ <text:line-break/><text:span text:style-name="T1"> </text:span><text:span text:style-name="T2">(113/8) </text:span> →ϣ←{ⲉ}ⲓⲃⲉ ⲉⲙⲛ̅ ϩⲓⲥⲉ ⲅⲁⲣ ⲙ̅ⲙⲁⲩ <text:line-break/><text:span text:style-name="T1"> </text:span><text:span text:style-name="T2">(113/9) </text:span> ϩⲁⲧⲏⲟⲩ ⲁⲩⲱ ⲙⲛ̅ ⲙⲛⲧⲁⲧϭⲟⲙ <text:line-break/><text:span text:style-name="T1"> </text:span><text:span text:style-name="T2">(113/10) </text:span> ⲁⲗⲗⲁ ⲟⲩⲱϣ ⲡⲉ ⲁⲛⲁⲓⲱⲛ ϫⲱⲕ ⲉ‐ <text:line-break/><text:span text:style-name="T1"> </text:span><text:span text:style-name="T2">(113/11) </text:span> ⲃⲟⲗ ⲛ̅ⲧⲉⲉⲓϩⲉ ϩⲛ̅ ⲟⲩϭⲉⲡ→ⲏ← ⲙⲛ̅ ⲙ̅ⲡⲉ <text:line-break/><text:span text:style-name="T1"> </text:span><text:span text:style-name="T2">(113/12) </text:span> ⲙ̅ⲛ̅ ⲛⲉⲥⲧⲉⲣⲉⲱⲙⲁ ϩⲙ̅ ⲡⲉⲟⲟⲩ <text:line-break/><text:span text:style-name="T1"> </text:span><text:span text:style-name="T2">(113/13) </text:span> ⲙ̅ⲡⲁⲑⲁⲛⲁⲧⲟⲥ ⲛ̅ⲣⲱⲙⲉ· ⲙⲛ̅ ⲧⲥⲟ‐ <text:line-break/><text:span text:style-name="T1"> </text:span><text:span text:style-name="T2">(113/14) </text:span> ⲫⲓⲁ ⲧⲉϥⲥⲩⲛⲍⲩⲅⲟⲥ ⲡⲙⲁ ⲛ̅ⲧⲁⲩϫⲓ <text:line-break/><text:span text:style-name="T1"> </text:span><text:span text:style-name="T2">(113/15) </text:span> ⲥⲙⲟⲧ%3 ⲙ̅ⲙⲁⲩ ⲛ̅ϭⲓ ⲁⲓⲱⲛ ⲛⲓⲙ ϩⲓ ⲕⲟ‐ <text:line-break/><text:span text:style-name="T1"> </text:span><text:span text:style-name="T2">(113/16) </text:span> [ⲥ]ⲙⲟⲥ ⲙⲛ̅ ⲛⲉⲛⲧⲁⲩϣⲱⲡⲉ ⲙⲛ̅ⲛ̅‐ <text:line-break/><text:span text:style-name="T1"> </text:span><text:span text:style-name="T2">(113/17) </text:span> ⲥ̣ⲁ ⲛⲁⲓ̈ ⲉⲃⲟⲗ ⲛ̅ϩⲏⲧϥ̅ ⲉⲡⲉⲩⲧⲁⲙⲓⲟ <text:line-break/><text:span text:style-name="T1"> </text:span><text:span text:style-name="T2">(113/18) </text:span> ⲛ̅ϩⲉⲛⲉⲓⲛⲉ ϩⲛ̅ ⲙ̅ⲡⲉ ⲙ̅ⲡⲉⲭⲁⲟⲥ <text:line-break/><text:span text:style-name="T1"> </text:span><text:span text:style-name="T2">(113/19) </text:span> ⲙⲛ̅ ⲛⲉⲩⲕⲟⲥⲙⲟⲥ· ⲧⲉⲫⲩⲥⲓⲥ ⲇⲉ <text:line-break/><text:span text:style-name="T1"> </text:span><text:span text:style-name="T2">(113/20) </text:span> ⲧ̣ⲏⲣⲥ ϫⲓⲛ ⲙ̅ⲡⲟⲩⲱⲛϩ ⲙ̅ⲡⲉⲭⲁⲟⲥ <text:line-break/><text:span text:style-name="T1"> </text:span><text:span text:style-name="T2">(113/21) </text:span> ⲉⲃⲟⲗ ϩⲙ̅ ⲡⲟⲩⲟⲉⲓⲛ ⲉⲧⲣ̅ ⲟⲩⲟⲉⲓⲛ ⲉ‐ <text:line-break/><text:span text:style-name="T1"> </text:span><text:span text:style-name="T2">(113/22) </text:span> ⲧⲉ ⲙⲛ̅ⲧϥ̅ ϩⲁⲉⲓⲃⲉⲥ ⲙⲛ̅ ⲟⲩⲣⲁϣⲉ <text:line-break/><text:span text:style-name="T1"> </text:span><text:span text:style-name="T2">(113/23) </text:span> ⲉ̣ⲛⲉⲩⲉϣ ϣⲁϫⲉ ⲉⲣⲟϥ ⲙⲛ̅ ⲟⲩ‐ <text:line-break/><text:span text:style-name="T1"> </text:span><text:span text:style-name="T2">(113/24) </text:span> ⲧ̣ⲉⲗⲏⲗ ⲛ̅ⲁⲧ%6ϫⲟⲟϥ ⲉⲩⲙⲏⲛ ⲉⲃⲟⲗ <text:line-break/><text:span text:style-name="T1"> </text:span><text:span text:style-name="T2">(113/25) </text:span> ⲉⲩⲣⲟⲟⲩⲧ%6 ⲉϩⲣⲁⲓ̈ ⲉϫⲛ̅ ⲡⲉⲩⲉⲟⲟⲩ <text:line-break/><text:span text:style-name="T1"> </text:span><text:span text:style-name="T2">(114/1) </text:span> ⲛ̅ⲁⲧ%6ϣⲓⲃⲉ ⲙⲛ̅ ⲧⲁⲛⲧⲡⲁⲩⲥⲓⲥ ⲛ̅ⲁ‐ <text:line-break/><text:span text:style-name="T1"> </text:span><text:span text:style-name="T2">(114/2) </text:span> ⲧϣⲓⲧⲥ̅ ⲧⲁⲓ̈ ⲉⲧⲉ ⲛ̅ⲛⲉⲩⲉϣ ϣⲁ‐ <text:line-break/><text:span text:style-name="T1"> </text:span><text:span text:style-name="T2">(114/3) </text:span> ϫⲉ ⲉⲣⲟⲥ ϩⲛ̅ ⲛⲁⲓⲱⲛ ⲧⲏⲣⲟⲩ ⲛ̅ⲧⲁⲩ‐ <text:line-break/><text:span text:style-name="T1"> </text:span><text:span text:style-name="T2">(114/4) </text:span> ϣⲱⲡⲉ ⲙⲛ̅ⲛ̅ⲥⲁ ⲛⲁⲓ̈ ⲙⲛ̅ ⲛⲉⲩ‐ <text:line-break/><text:span text:style-name="T1"> </text:span><text:span text:style-name="T2">(114/5) </text:span> ϭⲟⲙ ⲧⲏⲣⲟⲩ· ⲛⲁⲓ̈ ⲇⲉ ⲧⲏⲣⲟⲩ ⲛ̅‐ <text:line-break/><text:span text:style-name="T1"> </text:span><text:span text:style-name="T2">(114/6) </text:span> ⲧⲁⲉⲓϫⲟⲟⲩ ⲉⲣⲱⲧⲛ ⲛ̅ϣⲟⲣⲡ%6 ⲁⲉⲓ‐ <text:line-break/><text:soft-page-break/><text:span text:style-name="T1"> </text:span><text:span text:style-name="T2">(114/7) </text:span> ϫⲟⲟⲩ ϣⲁⲛⲧⲉⲧⲛ̅ⲣ̅ ⲟⲩⲟⲉⲓⲛ ϩⲙ̅ <text:line-break/><text:span text:style-name="T1"> </text:span><text:span text:style-name="T2">(114/8) </text:span> ⲡⲟⲩⲟⲉⲓⲛ ⲛ̅ϩⲟⲩⲟ ⲉⲛⲁⲓ̈· ⲡⲉϫⲁⲥ <text:line-break/><text:span text:style-name="T1"> </text:span><text:span text:style-name="T2">(114/9) </text:span> ⲛⲁϥ ⲛ̅ϭⲓ ⲙⲁⲣⲓϩⲁⲙⲙⲏ ϫⲉ ⲡϫⲟ‐ <text:line-break/><text:span text:style-name="T1"> </text:span><text:span text:style-name="T2">(114/10) </text:span> ⲉⲓⲥ ⲉⲧⲟⲩⲁⲁⲃ· ⲛⲉⲕⲙⲁⲑⲏⲧⲏⲥ ⲛ̅‐ <text:line-break/><text:span text:style-name="T1"> </text:span><text:span text:style-name="T2">(114/11) </text:span> ⲧⲁⲩⲉⲓ ⲧⲱⲛ ⲏ͂ ⲉⲩⲛⲁ ⲉⲧⲱⲛ ⲏ͂ ⲉⲩ‐ <text:line-break/><text:span text:style-name="T1"> </text:span><text:span text:style-name="T2">(114/12) </text:span> ⲛⲁⲣ ⲟⲩ ⲙ̅ⲡⲉⲉⲓⲙⲁ· ⲡⲉϫⲁϥ ⲛⲁⲩ <text:line-break/><text:span text:style-name="T1"> </text:span><text:span text:style-name="T2">(114/13) </text:span> ⲛ̅ϭⲓ ⲡⲧⲉⲗⲓⲟⲥ ⲛ̅ⲥⲱⲧⲏⲣ· ϫⲉ ϯⲟⲩ‐ <text:line-break/><text:span text:style-name="T1"> </text:span><text:span text:style-name="T2">(114/14) </text:span> ⲱϣ ⲉⲧⲣⲉⲧⲛ̅ⲉⲓⲙⲉ ϫⲉ ⲧⲥⲟⲫⲓⲁ <text:line-break/><text:span text:style-name="T1"> </text:span><text:span text:style-name="T2">(114/15) </text:span> ⲧⲙⲁⲁⲩ ⲙ̅ⲡⲧⲏⲣϥ· ⲁⲩⲱ ⲧⲥⲩⲛⲍⲩ‐ <text:line-break/><text:span text:style-name="T1"> </text:span><text:span text:style-name="T2">(114/16) </text:span> ⲅⲟⲥ ⲁⲥⲣ̅ ϩⲛⲁⲥ ϩⲓⲧⲟⲟⲧⲥ̅ ⲙ̅ⲙⲓⲛ̣ <text:line-break/><text:span text:style-name="T1"> </text:span><text:span text:style-name="T2">(114/17) </text:span> ⲙ̅ⲙⲟⲥ ⲉⲧⲣⲉⲛⲁⲓ̈ ϣⲱⲡⲉ ⲁϫⲙ̅ <text:line-break/><text:span text:style-name="T1"> </text:span><text:span text:style-name="T2">(114/18) </text:span> ⲡⲉⲥϩⲟⲟⲩⲧ ϩⲙ̅ ⲡⲉⲧⲉϩⲛⲁϥ ⲇⲉ <text:line-break/><text:span text:style-name="T1"> </text:span><text:span text:style-name="T2">(114/19) </text:span> ⲙ̅ⲡⲉⲓⲱⲧ ⲙ̅ⲡⲧⲏⲣϥ̅· ϫⲉ ⲉⲣⲉⲡⲉϥ‐ <text:line-break/><text:span text:style-name="T1"> </text:span><text:span text:style-name="T2">(114/20) </text:span> ⲁⲅⲁⲑⲟⲛ ⲟⲩⲱⲛϩ ⲉⲃⲟⲗ ⲛ̅ⲁⲧⲙⲉ <text:line-break/><text:span text:style-name="T1"> </text:span><text:span text:style-name="T2">(114/21) </text:span> ⲟⲩⲉ ⲉⲣⲟϥ· ⲁϥⲧⲁⲙⲓⲟ ⲙ̅ⲡⲉⲉⲓⲕⲁ‐ <text:line-break/><text:span text:style-name="T1"> </text:span><text:span text:style-name="T2">(114/22) </text:span> ⲧⲁⲡⲉⲧⲁⲥⲙⲁ ⲟⲩⲧⲱⲟⲩ ⲛ̅ⲛⲓⲁ‐ <text:line-break/><text:span text:style-name="T1"> </text:span><text:span text:style-name="T2">(114/23) </text:span> ⲑⲁⲛⲁⲧⲟⲥ ⲁⲩⲱ ⲟⲩⲧⲱⲟⲩ ⲛ̅ⲛⲉ‐ <text:line-break/><text:span text:style-name="T1"> </text:span><text:span text:style-name="T2">(114/24) </text:span> ⲛ̅ⲧⲁⲩϣⲱⲡⲉ ⲙⲛ̅ⲛ̅ⲥⲁ ⲛⲁⲓ̈ <text:line-break/><text:span text:style-name="T1"> </text:span><text:span text:style-name="T2">(114/25) </text:span> ϫⲉ ⲉⲣⲉⲡⲁⲕⲟⲗⲟⲩⲑⲟⲛ ⲁⲕⲟⲗⲟⲩ[ⲑⲉⲓ] <text:line-break/><text:span text:style-name="T1"> </text:span><text:span text:style-name="T2">(117/1) </text:span> ⲉⲧⲙ̅ⲙⲁⲩ ⲙⲛ̅ ⲡⲛⲓϥⲉ ⲛ̅ⲥⲉϣⲱ‐ <text:line-break/><text:span text:style-name="T1"> </text:span><text:span text:style-name="T2">(117/2) </text:span> ⲡⲉ ⲙ̅ⲡⲉⲥⲛⲁⲩ ⲛ̅ⲟⲩⲁ ⲛ̅ⲑⲉ ⲟⲛ ϫⲓⲛ <text:line-break/><text:span text:style-name="T1"> </text:span><text:span text:style-name="T2">(117/3) </text:span> ⲛ̅ϣⲟⲣⲡ%6 ϫⲉ ⲉⲧⲉⲧⲛⲁϯ ⲕⲁⲣⲡⲟⲥ <text:line-break/><text:span text:style-name="T1"> </text:span><text:span text:style-name="T2">(117/4) </text:span> ⲉⲛⲁϣⲱϥ ⲛ̅ⲧⲉⲧⲛ̅ⲃⲱⲕ ⲉϩⲣⲁⲓ̈ ϣⲁ <text:line-break/><text:span text:style-name="T1"> </text:span><text:span text:style-name="T2">(117/5) </text:span> ⲡⲉⲧϣⲟⲟⲡ%6 ϫⲓⲛ ⲛ̅ϣⲟⲣⲡ%6 ϩⲛ̅ ⲟⲩ‐ <text:line-break/><text:span text:style-name="T1"> </text:span><text:span text:style-name="T2">(117/6) </text:span> ⲣⲁϣⲉ ⲛ̅ⲁⲧϣ̣[ⲁ]ϫ̣ⲉ ⲉⲣⲟϥ ⲙⲛ̅ ⲟⲩⲉⲟⲟⲩ <text:line-break/><text:span text:style-name="T1"> </text:span><text:span text:style-name="T2">(117/7) </text:span> ⲙⲛ̅ ⲟ̣[ⲩⲧⲁⲉⲓⲟ ⲙⲛ̅ ⲟ]ⲩ̣ϩⲙⲟⲧ%6 ⲛ̅ⲧⲉ <text:line-break/><text:span text:style-name="T1"> </text:span><text:span text:style-name="T2">(117/8) </text:span> [ⲡ]ⲉ̣[ⲓⲱⲧ%6 ⲙ̅ⲡⲧⲏⲣϥ] ⲡ̣ⲉⲧⲥⲟⲟⲩⲛ <text:line-break/><text:span text:style-name="T1"> </text:span><text:span text:style-name="T2">(117/9) </text:span> [ϭⲉ ⲙ̅ⲡⲉⲓⲱⲧ%6 ϩⲛ̅ ⲟⲩⲅⲛ]ⲱⲥⲓⲥ ⲛ̅ⲕⲁ‐ <text:line-break/><text:span text:style-name="T1"> </text:span><text:span text:style-name="T2">(117/10) </text:span> [ⲑⲁⲣⲟⲛ ⲡⲁⲓ̈ ϥⲛⲁⲭⲱ]ⲣⲓ ⲉⲡⲓⲱⲧ%6 <text:line-break/><text:span text:style-name="T1"> </text:span><text:span text:style-name="T2">(117/11) </text:span> [ⲛ̅ϥⲙ̅ⲧⲟⲛ ⲙ̅ⲙⲟϥ ϩⲙ̅] ⲡⲁⲅⲉⲛⲛⲏ‐ <text:line-break/><text:span text:style-name="T1"> </text:span><text:span text:style-name="T2">(117/12) </text:span> [ⲧⲟⲥ ⲛ̅ⲉⲓⲱⲧ%6 ⲡⲉⲧⲥⲟⲟ]ⲩⲛ ⲇⲉ ⲙ̅‐ <text:line-break/><text:span text:style-name="T1"> </text:span><text:span text:style-name="T2">(117/13) </text:span> [ⲙⲟϥ ϩⲛ̅ ⲟⲩϣⲱⲱ]ⲧ̣%6 ⲉϥⲛⲁⲭⲱ‐ <text:line-break/><text:span text:style-name="T1"> </text:span><text:span text:style-name="T2">(117/14) </text:span> [ⲣⲓ ⲉⲡϣⲱⲱⲧ%6 ⲁⲩ]ⲱ ⲧⲁⲛⲁⲡⲁⲩⲥⲓⲥ <text:line-break/><text:span text:style-name="T1"> </text:span><text:span text:style-name="T2">(117/15) </text:span> [ⲛ̅ⲧⲙⲉϩϣⲙⲟⲩ]ⲛ̣ⲉ· ⲡⲉⲧⲥⲟⲟⲩⲛ <text:line-break/><text:span text:style-name="T1"> </text:span><text:span text:style-name="T2">(117/16) </text:span> [ⲇⲉ ⲙ̅ⲡⲉⲡ̅ⲛ̅ⲁ̅ ⲛ̅ⲁⲑ]ⲁ̣ⲛⲁⲧⲟⲥ ⲛ̅ⲧⲉ <text:line-break/><text:span text:style-name="T1"> </text:span><text:span text:style-name="T2">(117/17) </text:span> [ⲡ]ⲟ̣ⲩ̣ⲟ̣ⲉ̣ⲓ̣ⲛ ϩⲛ̅ ⲧⲥⲓⲅⲏ ϩⲓⲧⲛ̅ ⲧⲉⲛⲑⲩ‐ <text:line-break/><text:span text:style-name="T1"> </text:span><text:span text:style-name="T2">(117/18) </text:span> [ⲙ]ⲏ̣ⲥⲓⲥ ⲙⲛ̅ ⲧⲉⲩⲇⲟⲕⲓⲁ ϩⲛ̅ ⲧⲙⲏⲉ <text:line-break/><text:span text:style-name="T1"> </text:span><text:span text:style-name="T2">(117/19) </text:span> ⲙⲁⲣⲉϥⲉⲓⲛⲉ ⲛⲁⲓ̈ ⲛ̅ϩⲉⲛⲥⲩⲙⲃⲟⲗⲟⲛ <text:line-break/><text:span text:style-name="T1"> </text:span><text:span text:style-name="T2">(117/20) </text:span> ⲛ̅ⲧⲉ ⲡⲓⲁϩⲟⲣⲁⲧⲟⲛ ⲁⲩⲱ ⲉϥⲛⲁϣⲱ‐ <text:line-break/><text:span text:style-name="T1"> </text:span><text:span text:style-name="T2">(117/21) </text:span> ⲡ̣ⲉ ⲛ̅ⲟⲩⲟⲉⲓⲛ ϩⲙ̅ ⲡⲉⲡ̅ⲛ̅ⲁ̅ ⲛ̅ⲧⲥⲓⲅⲏ <text:line-break/><text:span text:style-name="T1"> </text:span><text:span text:style-name="T2">(117/22) </text:span> ⲡ̣ⲉⲧⲥⲟⲟⲩⲛ ⲙ̅ⲡϣⲏⲣⲉ ⲙ̅ⲡⲣⲱ‐ <text:line-break/><text:span text:style-name="T1"> </text:span><text:span text:style-name="T2">(117/23) </text:span> [ⲙ]ⲉ̣ ϩⲛ̅ ⲟⲩⲥⲟⲟⲩⲛ ⲙⲛ̅ ⲟⲩⲁⲅⲁⲡⲏ <text:line-break/><text:span text:style-name="T1"> </text:span><text:span text:style-name="T2">(117/24) </text:span> ⲙⲁⲣⲉϥⲉⲓⲛⲉ ⲛⲉ{ⲉ̅ⲓ}· ⲛ̅ⲟⲩⲥⲩⲙⲃⲟⲗⲟⲛ <text:line-break/><text:span text:style-name="T1"> </text:span><text:span text:style-name="T2">(118/1) </text:span> {ⲛ}ⲛ̅ⲧⲉ ⲡϣⲏⲣⲉ ⲙ̅ⲡⲣⲱⲙⲉ ⲛϥ̅ⲭⲱ‐ <text:line-break/><text:span text:style-name="T1"> </text:span><text:span text:style-name="T2">(118/2) </text:span> ⲣⲓ ⲉⲛⲙⲁ ⲙⲛ̅ ⲛⲉⲧϩⲛ̅ ⲧⲙⲉϩϣⲙⲟⲩ‐ <text:line-break/><text:span text:style-name="T1"> </text:span><text:span text:style-name="T2">(118/3) </text:span> ⲛⲉ ⲉⲓⲥ ϩⲏⲏⲧⲉ ⲁⲉⲓⲟⲩⲱⲛϩ ⲛⲏⲧⲛ̅ <text:line-break/><text:span text:style-name="T1"> </text:span><text:span text:style-name="T2">(118/4) </text:span> ⲙ̅ⲡⲣⲉⲛ ⲙ̅ⲡⲓⲧⲉⲗⲓⲟⲥ ⲡⲟⲩⲱϣⲉ <text:line-break/><text:soft-page-break/><text:span text:style-name="T1"> </text:span><text:span text:style-name="T2">(118/5) </text:span> ⲧⲏⲣϥ ⲛ̅ⲧⲙⲁⲁⲩ ⲛ̅ⲛ̅ⲁⲅ%3ⲅⲉⲗⲟⲥ ⲉⲧⲟⲩ‐ <text:line-break/><text:span text:style-name="T1"> </text:span><text:span text:style-name="T2">(118/6) </text:span> ⲁⲁⲃ· ϫⲉ ⲉϥⲛⲁϫⲱ̣ⲕ ⲉⲃⲟⲗ ⲙ̅ⲡⲉ‐ <text:line-break/><text:span text:style-name="T1"> </text:span><text:span text:style-name="T2">(118/7) </text:span> ⲉⲓⲙⲁ ⲛ̅ϭⲓ ⲡ̣ⲙ̣ⲏ̣[ⲏϣⲉ ⲙ̅ⲙ]ⲛ̣̅ⲧϩⲟ‐ <text:line-break/><text:span text:style-name="T1"> </text:span><text:span text:style-name="T2">(118/8) </text:span> ⲟⲩⲧ%3 ϫⲉ ⲉⲩ[ⲉⲟⲩⲱⲛϩ ϩⲛ̅ ⲛⲓⲁⲓ]ⲱ̣[ⲛ] <text:line-break/><text:span text:style-name="T1"> </text:span><text:span text:style-name="T2">(118/9) </text:span> ⲉⲃⲟⲗ ⲛ̅ϭⲓ̣ [ⲛⲓⲁⲡⲉⲣⲁⲛⲧⲟⲛ ⲁⲩⲱ] <text:line-break/><text:span text:style-name="T1"> </text:span><text:span text:style-name="T2">(118/10) </text:span> ⲛⲉⲛⲧⲁⲩϣ[ⲱⲡⲉ ϩⲛ̅ ⲧⲙⲛ̅ⲧⲣⲙⲙⲁⲟ] <text:line-break/><text:span text:style-name="T1"> </text:span><text:span text:style-name="T2">(118/11) </text:span> ⲛ̅ⲛⲁⲧϫⲓ ϭⲉ̣[ϫⲙⲉ ⲛ̅ⲥⲱⲥ ⲛ̅ⲧⲉ ⲡⲛⲟϭ] <text:line-break/><text:span text:style-name="T1"> </text:span><text:span text:style-name="T2">(118/12) </text:span> ⲛ̅ⲁϩⲟⲣⲁ̣[ⲧⲟⲛ ⲙ̅ⲡ̅ⲛ̅ⲁ̅ ϫⲉ ⲉⲩⲉϫⲓ] <text:line-break/><text:span text:style-name="T1"> </text:span><text:span text:style-name="T2">(118/13) </text:span> ⲧⲏⲣⲟⲩ ⲉⲃⲟⲗ̣ [ϩⲙ̅ ⲡⲉϥⲁⲅⲁⲑⲟⲛ] <text:line-break/><text:span text:style-name="T1"> </text:span><text:span text:style-name="T2">(118/14) </text:span> ⲙⲛ̅ ⲧⲙⲛ̅ⲧⲣ̅ⲙ[ⲙⲁⲟ ⲛ̅ⲧⲉⲩⲁⲛⲁⲡⲁⲩ]‐ <text:line-break/><text:span text:style-name="T1"> </text:span><text:span text:style-name="T2">(118/15) </text:span> ⲥⲓⲥ ⲉⲧⲉ ⲙⲛ̅ ⲙⲛ̣̅[ⲧⲣ̅ⲣⲟ ϩⲓϫⲱⲥ· ⲁ]‐ <text:line-break/><text:span text:style-name="T1"> </text:span><text:span text:style-name="T2">(118/16) </text:span> ⲛⲟⲕ ⲛ̅ⲧⲁⲉⲓ{ⲉ̅ⲓ} [ⲉⲃⲟⲗ ϩⲙ̅ ⲡϣⲟⲣⲡ%6 ⲛ̅]‐ <text:line-break/><text:span text:style-name="T1"> </text:span><text:span text:style-name="T2">(118/17) </text:span> ⲧⲁⲩⲧⲛ̅ⲛⲟⲟⲩϥ· ϫ̣ⲉ ⲉⲉⲓⲛⲁⲟ̣ⲩ̣ⲱ̣ⲛ̣[ϩ] <text:line-break/><text:span text:style-name="T1"> </text:span><text:span text:style-name="T2">(118/18) </text:span> ⲛⲏⲧⲛ̅ ⲉⲃⲟⲗ ⲙ̅ⲡⲉⲧϣⲟⲟⲡ%3 ϫⲛ̅ ⲛ̅‐ <text:line-break/><text:span text:style-name="T1"> </text:span><text:span text:style-name="T2">(118/19) </text:span> ϣⲟⲣⲡ%6 ⲉⲧⲃⲉ ⲧⲙⲛ̅ⲧϫⲁⲥⲓϩⲏⲧ%3 <text:line-break/><text:span text:style-name="T1"> </text:span><text:span text:style-name="T2">(118/20) </text:span> ⲙ̅ⲡⲁⲣⲭⲓⲅⲉⲛⲉⲧⲱⲣ· ⲙⲛ̅ ⲛⲉϥⲁⲅ%3‐ <text:line-break/><text:span text:style-name="T1"> </text:span><text:span text:style-name="T2">(118/21) </text:span> ⲅⲉⲗⲟⲥ ϫⲉ ⲥⲉϫⲱ ⲙ̅ⲙⲟⲥ ⲉⲣⲟⲟⲩ <text:line-break/><text:span text:style-name="T1"> </text:span><text:span text:style-name="T2">(118/22) </text:span> ϫⲉ ϩⲉⲛⲛⲟⲩⲧⲉ ⲛⲉ· ⲁⲛⲟⲕ ⲇⲉ <text:line-break/><text:span text:style-name="T1"> </text:span><text:span text:style-name="T2">(118/23) </text:span> ⲛ̅ⲧⲁⲉⲓ{ⲉ̅ⲓ}· ⲉⲥⲁϩⲱⲟⲩ ⲛ̅ⲧⲉⲩⲙⲛⲧ̣‐ <text:line-break/><text:span text:style-name="T1"> </text:span><text:span text:style-name="T2">(118/24) </text:span> ⲃⲗ̅ⲗⲉ· ϫⲉ ⲉⲉⲓⲛⲁϫⲱ ⲛ̅ⲟⲩⲟⲛ ⲛⲓⲙ <text:line-break/><text:span text:style-name="T1"> </text:span><text:span text:style-name="T2">(118/25) </text:span> ⲙ̅ⲡⲛⲟⲩⲧⲉ ⲉⲧϩⲓϫⲙ̅ ⲡⲧⲏⲣϥ· <text:line-break/><text:span text:style-name="T1"> </text:span><text:span text:style-name="T2">(119/1) </text:span> ⲛ̅ⲧⲱⲧⲛ̅ ϭⲉ ϩⲱⲙ ⲉϩⲣⲁⲓ̈ ⲉϫⲛ̅ ⲛⲉⲩ <text:line-break/><text:span text:style-name="T1"> </text:span><text:span text:style-name="T2">(119/2) </text:span> ⲙ̅ϩⲁⲟⲩ ⲧⲉⲩⲡⲣⲟⲛⲟⲓⲁ ⲙⲁⲑⲃ̅ <text:line-break/><text:span text:style-name="T1"> </text:span><text:span text:style-name="T2">(119/3) </text:span> ⲉⲓⲟⲥ ⲁⲩⲱ ⲡⲉⲩⲛⲁϩⲃ̅ ⲟⲩⲟϭⲡϥ· <text:line-break/><text:span text:style-name="T1"> </text:span><text:span text:style-name="T2">(119/4) </text:span> ⲁⲩⲱ ⲡⲱⲓ̈ ⲙⲁⲧⲟⲩⲛⲟⲥϥ ⲁⲉⲓϯ <text:line-break/><text:span text:style-name="T1"> </text:span><text:span text:style-name="T2">(119/5) </text:span> ⲛⲏⲧⲛ̅ ⲛ̅ⲧⲉⲝⲟⲩⲥⲓⲁ ⲛ̅ⲛ̅ⲕⲁ ⲛⲓⲙ· <text:line-break/><text:span text:style-name="T1"> </text:span><text:span text:style-name="T2">(119/6) </text:span> ϩⲱⲥ ϣⲏⲣⲉ ⲛ̅ⲧⲉ ⲡⲟⲩⲟⲉⲓⲛ ϫⲉ ⲉⲧⲉ <text:line-break/><text:span text:style-name="T1"> </text:span><text:span text:style-name="T2">(119/7) </text:span> ⲧ̣ⲛⲁϩⲱⲙ ⲉϩⲣⲁⲓ̈ ⲉϫⲛ̅ ⲧⲉⲩϭⲟⲙ· ϩⲁ <text:line-break/><text:span text:style-name="T1"> </text:span><text:span text:style-name="T2">(119/8) </text:span> [ⲛ]ⲉ̣ⲧ̣ⲛ̣̅[ⲟ]ⲩⲉⲣⲏⲧⲉ· ⲛⲁⲓ̈ ⲛⲉ ⲛ̅ⲧⲁϥ <text:line-break/><text:span text:style-name="T1"> </text:span><text:span text:style-name="T2">(119/9) </text:span> [ϫⲟⲟⲩ ⲛ̅ϭⲓ] ⲡ̣[ⲙⲁⲕⲁ]ⲣ̣ⲓⲟⲥ ⲛ̅ⲥⲱⲧⲏⲣ· <text:line-break/><text:span text:style-name="T1"> </text:span><text:span text:style-name="T2">(119/10) </text:span> [ⲁϥⲣ̅ ⲁⲧⲟⲩⲱⲛϩ ⲛ̅ⲥⲁ ⲛⲃⲟ]ⲗ ⲛⲁⲩ· ⲧⲟⲧⲉ <text:line-break/><text:span text:style-name="T1"> </text:span><text:span text:style-name="T2">(119/11) </text:span> [ⲙ̅ⲙⲁⲑⲏⲧⲏⲥ ⲧⲏⲣⲟⲩ ⲁⲩϣ]ⲱⲡⲉ ϩⲛ̅ ⲟⲩ <text:line-break/><text:span text:style-name="T1"> </text:span><text:span text:style-name="T2">(119/12) </text:span> [ⲛⲟϭ ⲛ̅ⲧⲉⲗⲏⲗ ⲛ̅ⲁⲧ]ϣ[ⲁ]ϫ̣ⲉ ⲉⲣⲟϥ ϩⲙ̅ <text:line-break/><text:span text:style-name="T1"> </text:span><text:span text:style-name="T2">(119/13) </text:span> [ⲡⲉⲡ̅ⲛ̅ⲁ̅ ϫⲓⲛ] ⲡⲉϩⲟⲟⲩ ⲉⲧⲙ̅ⲙⲁⲩ <text:line-break/><text:span text:style-name="T1"> </text:span><text:span text:style-name="T2">(119/14) </text:span> [ⲁⲛⲉϥⲙⲁⲑⲏⲧ]ⲏⲥ ⲁⲣⲭⲉⲥⲑⲁⲓ ⲉⲧⲁϣⲉ <text:line-break/><text:span text:style-name="T1"> </text:span><text:span text:style-name="T2">(119/15) </text:span> [ⲟⲉⲓϣ ⲙ̅ⲡⲉⲩⲁ]ⲅ̣%6ⲅⲉⲗⲓⲟⲛ ⲙ̅ⲡⲛⲟⲩ <text:line-break/><text:span text:style-name="T1"> </text:span><text:span text:style-name="T2">(119/16) </text:span> [ⲧⲉ ⲡⲉⲡ̅ⲛ̅ⲁ̅ ⲛ̅ⲁ]ⲫⲑⲁⲣⲧⲟⲛ ⲛ̅ϣⲁ <text:line-break/><text:span text:style-name="T1"> </text:span><text:span text:style-name="T2">(119/17) </text:span> [ⲉ]ⲛⲉϩ ϩⲁⲙⲏⲛ· <text:line-break/><text:span text:style-name="T1"> </text:span><text:span text:style-name="T2">(119/18) </text:span> ⲧⲥⲟⲫⲓⲁ ⲛ̅ⲓ̅ⲏ̅ⲥ̅ </text:p>
      <text:p text:style-name="P1"/>
      <text:p text:style-name="P3">( codex III ) The Dialogue of the Saviour</text:p>
      <text:p text:style-name="P2"><text:span text:style-name="T1"> </text:span><text:span text:style-name="T2">(120/1) </text:span> ⲡⲇⲓⲁⲗⲟⲅⲟⲥ ⲙ̅ⲡⲥⲱⲧⲏⲣ· <text:line-break/><text:span text:style-name="T1"> </text:span><text:span text:style-name="T2">(120/2) </text:span> ⲡⲥ̅ⲏ̅ⲣ̅ ⲡⲉϫⲁϥ ⲛ̅ⲛⲉϥⲙⲁⲑⲏⲧⲏⲥ <text:line-break/><text:span text:style-name="T1"> </text:span><text:span text:style-name="T2">(120/3) </text:span> ϫⲉⲏⲇⲏ ⲁⲡⲉⲟⲩⲟⲉⲓϣ ϣⲱⲡⲉ ⲛⲉ‐ <text:line-break/><text:span text:style-name="T1"> </text:span><text:span text:style-name="T2">(120/4) </text:span> ⲝⲛⲏⲟⲩ ϫⲉⲕⲁⲁⲥ ⲉⲛⲁⲕⲱ ⲛ̅ⲥⲱⲛ <text:line-break/><text:span text:style-name="T1"> </text:span><text:span text:style-name="T2">(120/5) </text:span> ⲙ̅ⲡⲉⲛϩⲓⲥⲉ· ⲛ̅ⲧⲛ̅ⲁϩⲉ ⲉⲣⲁⲧⲛ̅ ϩⲛ̅ <text:line-break/><text:span text:style-name="T1"> </text:span><text:span text:style-name="T2">(120/6) </text:span> ⲧⲁⲛⲁⲡⲁⲩⲥⲓⲥ· ⲡⲉⲧⲛⲁⲱϩⲉ ⲅⲁⲣ ⲉ‐ <text:line-break/><text:span text:style-name="T1"> </text:span><text:span text:style-name="T2">(120/7) </text:span> ⲣⲁⲧϥ̅ ϩⲛ̅ⲧⲁⲛⲁⲡⲁⲩⲥⲓⲥ ϥⲛⲁⲙ̅ⲧⲟⲛ <text:line-break/><text:span text:style-name="T1"> </text:span><text:span text:style-name="T2">(120/8) </text:span> ⲙ̅ⲙⲟϥ ⲛ̅ϣⲁⲉⲛⲉϩ· ⲁⲛⲟⲕ ⲇⲉ ϯ <text:line-break/><text:span text:style-name="T1"> </text:span><text:span text:style-name="T2">(120/9) </text:span> ϫⲱ ⲙ̅ⲙⲟⲥ ⲛⲏⲧⲛ̅ ϫⲉϣ̣ⲱ̣ⲡ̣ⲉ ⲛ̣̅‐ <text:line-break/><text:span text:style-name="T1"> </text:span><text:span text:style-name="T2">(120/10) </text:span> ⲧⲡⲉ ⲛ̅ⲟⲩⲟⲉⲓϣ ⲛⲓⲙ [.......] <text:line-break/><text:span text:style-name="T1"> </text:span><text:span text:style-name="T2">(120/11) </text:span> ⲟⲩⲟⲉⲓϣ ϫ.[ <text:line-break/><text:span text:style-name="T1"> </text:span><text:span text:style-name="T2">(120/12) </text:span> ⲙ̅ⲙⲟⲥ ⲛⲏⲧⲛ̅ [ <text:line-break/><text:span text:style-name="T1"> </text:span><text:span text:style-name="T2">(120/13) </text:span> ⲣ̅ϩⲟⲧⲉ ϩⲏ̣[ⲧ <text:line-break/><text:span text:style-name="T1"> </text:span><text:span text:style-name="T2">(120/14) </text:span> ⲉⲣⲱⲧⲛ̅ ϯ[ <text:line-break/><text:span text:style-name="T1"> </text:span><text:span text:style-name="T2">(120/15) </text:span> ϫⲉ ⲧⲟⲣⲅⲏ ⲟⲩϩⲟⲧⲉ ⲧ[ⲉ........] <text:line-break/><text:span text:style-name="T1"> </text:span><text:span text:style-name="T2">(120/16) </text:span> ⲕⲓⲙ ⲉⲧⲟⲣⲅⲏ ⲟⲩⲣ.[.........] <text:line-break/><text:span text:style-name="T1"> </text:span><text:span text:style-name="T2">(120/17) </text:span> ⲁⲗⲗⲁ ϩⲱⲥ ⲁⲧⲉⲧⲛ̅ⲁⲛ[.........] <text:line-break/><text:span text:style-name="T1"> </text:span><text:span text:style-name="T2">(120/18) </text:span> ⲣⲟⲩϣⲱⲡⲉ ⲉⲃⲟⲗ [ ] <text:line-break/><text:span text:style-name="T1"> </text:span><text:span text:style-name="T2">(120/19) </text:span> ⲁⲩϫⲓ ⲛ̅ⲛⲉⲉⲓϣⲁϫⲉ ⲉ̣ⲣⲟ̣ⲥ̣ ϩⲛ̣̅ⲟⲩϩ[ⲟ]‐ <text:line-break/><text:span text:style-name="T1"> </text:span><text:span text:style-name="T2">(120/20) </text:span> ⲧⲉ ⲙⲛ̅ⲟⲩⲥⲧⲱⲧ%6 ⲁⲩⲱ ⲁⲥⲧⲁϩⲟ ⲙ̣̅‐ <text:line-break/><text:span text:style-name="T1"> </text:span><text:span text:style-name="T2">(120/21) </text:span> ⲙⲟⲟⲩ ⲉⲣⲁⲧⲟⲩ ⲙⲛ̅ϩⲉⲛⲁⲣⲭⲱⲛ <text:line-break/><text:span text:style-name="T1"> </text:span><text:span text:style-name="T2">(120/22) </text:span> ϫⲉⲉⲃⲟⲗ ⲙ̅ⲙⲟⲥ ⲙ̅ⲡⲉⲗⲁⲁⲩ ⲉⲓ ⲉ‐ <text:line-break/><text:span text:style-name="T1"> </text:span><text:span text:style-name="T2">(120/23) </text:span> ⲃⲟⲗ· ⲁⲗⲗⲁ ⲁⲛⲟⲕ ⲛ̅ⲧⲉⲣⲓⲉⲓ ⲁⲉⲓ‐ <text:line-break/><text:span text:style-name="T1"> </text:span><text:span text:style-name="T2">(120/24) </text:span> ⲟⲩⲱⲛ ⲉⲧⲉϩⲓⲏ ⲁⲉⲓⲧⲥⲁⲃⲟⲟⲩ ⲉ‐ <text:line-break/><text:span text:style-name="T1"> </text:span><text:span text:style-name="T2">(120/25) </text:span> ⲧⲇⲓⲁⲃⲁⲥⲓⲥ ⲉⲧⲉⲩⲛⲁϫⲱⲃⲉ ⲙ̅ⲙ̣[ⲟⲥ] <text:line-break/><text:span text:style-name="T1"> </text:span><text:span text:style-name="T2">(120/26) </text:span> ⲛ̅ϭⲓⲛ̅ⲥⲱⲧ%6ⲡ%6 ⲙⲛ̅ⲛ̅ⲙⲟⲛⲟⲭⲟⲥ <text:line-break/><text:span text:style-name="T1"> </text:span><text:span text:style-name="T2">(121/1) </text:span> [ⲛⲁⲓ̈] ⲛ̣̅ⲧ̣ⲁⲩ̣ⲥ̣ⲟ̣ⲟ̣ⲩ̣ⲛ̣ ⲙ̣̅ⲡ̣ⲓ̣ⲱⲧ̣%6 ⲉ̣ⲁⲩ <text:line-break/><text:span text:style-name="T1"> </text:span><text:span text:style-name="T2">(121/2) </text:span> [ⲡ]ⲓⲥⲧⲉⲩⲉ ⲉⲧⲙⲏⲉ ⲁⲩⲱ ⲛⲉⲟⲟⲩ <text:line-break/><text:span text:style-name="T1"> </text:span><text:span text:style-name="T2">(121/3) </text:span> [ⲧ]ⲏ̣ⲣⲟⲩ ⲉⲧⲉⲧⲛ̅ϯ ⲛ̅ⲟⲩⲉⲟⲟⲩ ⲉⲧⲉ <text:line-break/><text:span text:style-name="T1"> </text:span><text:span text:style-name="T2">(121/4) </text:span> ⲧ̣ⲛ̅ϣⲁⲛϯⲉⲟⲟⲩ ϭⲉ ϯ ⲛ̅ⲧⲉⲉⲓϩⲉ <text:line-break/><text:span text:style-name="T1"> </text:span><text:span text:style-name="T2">(121/5) </text:span> ϫ̣ⲉⲥⲱⲧⲙ̅ ⲉⲣⲟⲛ ⲡⲉⲓⲱⲧ%6 ⲕⲁⲧⲁⲑⲉ <text:line-break/><text:span text:style-name="T1"> </text:span><text:span text:style-name="T2">(121/6) </text:span> ⲛ̅ⲧⲁⲕⲥⲱⲧⲙ̅ ⲉⲡⲉⲕⲙⲟⲛⲟⲅⲉⲛⲏⲥ <text:line-break/><text:span text:style-name="T1"> </text:span><text:span text:style-name="T2">(121/7) </text:span> ⲛ̣̅ϣⲏⲣⲉ ⲁⲩⲱ ⲁⲕϣⲟⲡϥ ⲉⲣⲟⲕ· <text:line-break/><text:span text:style-name="T1"> </text:span><text:span text:style-name="T2">(121/8) </text:span> [.ⲕ]ϯⲙ̅ⲧⲟⲛ ⲛⲁϥ ⲉⲃⲟⲗ ϩⲛ̅ϩⲁϩ ⲛ̅‐ <text:line-break/><text:span text:style-name="T1"> </text:span><text:span text:style-name="T2">(121/9) </text:span> [..... ⲛ̅ⲧ]ⲟⲕ ⲡⲉ̣ [ⲡⲁ]ⲓ̈ ⲉⲧⲉⲧⲉϥϭⲟⲙ <text:line-break/><text:span text:style-name="T1"> </text:span><text:span text:style-name="T2">(121/10) </text:span> [ ]ⲉ̣ⲕϩⲟⲡⲗⲟⲛ ϩⲉⲛ <text:line-break/><text:span text:style-name="T1"> </text:span><text:span text:style-name="T2">(121/11) </text:span> [ ].ⲟⲩⲟⲉⲓⲛ <text:line-break/><text:span text:style-name="T1"> </text:span><text:span text:style-name="T2">(121/12) </text:span> [ ]ⲟⲩⲉϥⲟⲛϩ <text:line-break/><text:span text:style-name="T1"> </text:span><text:span text:style-name="T2">(121/13) </text:span> [ ]ⲉⲙⲁⲩϭⲙ̅ϭⲱⲙϥ <text:line-break/><text:span text:style-name="T1"> </text:span><text:span text:style-name="T2">(121/14) </text:span> [ ]ⲛϩⲡⲗⲟⲅⲟⲥ ⲙ̅ <text:line-break/><text:span text:style-name="T1"> </text:span><text:span text:style-name="T2">(121/15) </text:span> [........]ⲙ̣ⲉ̣ⲧⲁⲛⲟⲓⲁ ⲙ̅ⲡⲱⲛϩ· <text:line-break/><text:span text:style-name="T1"> </text:span><text:span text:style-name="T2">(121/16) </text:span> [........]ⲃⲟⲗ ⲙ̅ⲙⲟⲕ ⲛ̅ⲧⲟⲕ ⲡⲉ <text:line-break/><text:span text:style-name="T1"> </text:span><text:span text:style-name="T2">(121/17) </text:span> [ⲡ]ⲙⲉⲟⲩⲉ ⲁⲩⲱ ⲧⲙⲛ̅ⲧⲁⲧⲣⲟⲟⲩϣ <text:line-break/><text:span text:style-name="T1"> </text:span><text:span text:style-name="T2">(121/18) </text:span> [ⲧ]ⲏ̣ⲣⲥ̅· ⲛ̅ⲙ̅ⲙⲟⲛⲟⲭⲟⲥ· ⲡⲁⲗⲓⲛ ⲥⲱ‐ <text:line-break/><text:span text:style-name="T1"> </text:span><text:span text:style-name="T2">(121/19) </text:span> [ⲧ]ⲙ̅ ⲉⲣⲟⲛ ⲕⲁⲧⲁⲑⲉ ⲛ̅ⲧⲁⲕⲥⲱⲧⲙ̅ ⲉ‐ <text:line-break/><text:span text:style-name="T1"> </text:span><text:span text:style-name="T2">(121/20) </text:span> ⲛ̣ⲉⲕⲥⲱⲧⲡ%6 ⲛⲁⲓ̈ ϩⲛ̅ⲧⲉⲕⲡⲣⲟⲥⲫⲟ‐ <text:line-break/><text:span text:style-name="T1"> </text:span><text:span text:style-name="T2">(121/21) </text:span> [ⲣ]ⲁ̣ ⲉ.ⲛⲏⲟⲩ ⲉϩⲟⲩⲛ ϩⲛ̅ⲛⲉⲩϩⲃⲏⲟⲩⲉ <text:line-break/><text:soft-page-break/><text:span text:style-name="T1"> </text:span><text:span text:style-name="T2">(121/22) </text:span> [ⲉⲧⲛⲁ]ⲛⲟⲩⲟⲩ ⲛⲁⲓ̈ ⲛ̅ⲧⲁⲩⲥⲱⲧⲉ <text:line-break/><text:span text:style-name="T1"> </text:span><text:span text:style-name="T2">(121/23) </text:span> [ⲛ̅ⲛ]ⲉⲩⲯⲩⲭⲟⲟⲩⲉ ⲉⲃⲟⲗ ϩⲛ̅ⲛⲓⲕⲱ‐ <text:line-break/><text:span text:style-name="T1"> </text:span><text:span text:style-name="T2">(121/24) </text:span> [ⲗ]ⲟ̣ⲛ ⲙ̅ⲃⲗⲗⲉ ϫⲉⲕⲁⲁⲥ ⲉⲩⲛⲁϣⲱⲡⲉ <text:line-break/><text:span text:style-name="T1"> </text:span><text:span text:style-name="T2">(122/1) </text:span> ϣⲁⲛⲓⲉⲛⲉϩ ϩⲁⲙⲏⲛ· ϯⲛⲁ <text:line-break/><text:span text:style-name="T1"> </text:span><text:span text:style-name="T2">(122/2) </text:span> ⲧⲥⲁⲃⲱⲧⲛ̅ ϩⲟⲧⲁⲛ ⲉϥϣⲁⲛϣⲱ <text:line-break/><text:span text:style-name="T1"> </text:span><text:span text:style-name="T2">(122/3) </text:span> ⲡⲉ ⲛ̅ϭⲓⲡⲉⲟⲩⲟⲉⲓϣ ⲙ̅ⲡⲃⲱⲗ ⲉⲃⲟⲗ <text:line-break/><text:span text:style-name="T1"> </text:span><text:span text:style-name="T2">(122/4) </text:span> ⲧϣⲟⲣⲡ%6 ⲛ̅ϭⲟⲙ ⲙ̅ⲡⲕⲁⲕⲉ ⲛⲁ <text:line-break/><text:span text:style-name="T1"> </text:span><text:span text:style-name="T2">(122/5) </text:span> ⲧⲱⲙⲛ̅ⲧ ⲉⲣⲱⲧⲛ̅· ⲙ̅ⲡⲣ̅ⲣ̅ϩⲟⲧⲉ <text:line-break/><text:span text:style-name="T1"> </text:span><text:span text:style-name="T2">(122/6) </text:span> ⲛ̅ⲧⲉⲧⲛ̅ϫⲟⲟⲥ ϫⲉⲉⲓⲥⲡⲉⲟⲩⲟ <text:line-break/><text:span text:style-name="T1"> </text:span><text:span text:style-name="T2">(122/7) </text:span> ⲉⲓϣ ⲁϥϣⲱⲡⲉ· ⲁⲗⲗⲁ ⲉϣⲁⲧⲉⲧⲛ̅ⲛⲁⲩ̣ <text:line-break/><text:span text:style-name="T1"> </text:span><text:span text:style-name="T2">(122/8) </text:span> ⲉⲩϭⲉⲣⲱⲃ ⲛ̅ⲟⲩⲱⲧ· ⲉ......[.] <text:line-break/><text:span text:style-name="T1"> </text:span><text:span text:style-name="T2">(122/9) </text:span> ⲡⲉ· ⲡⲁⲓ̈ ⲉ.[....]..[......] <text:line-break/><text:span text:style-name="T1"> </text:span><text:span text:style-name="T2">(122/10) </text:span> ⲛⲉⲁⲛⲛ̅ⲛ̅ⲟⲩ[ <text:line-break/><text:span text:style-name="T1"> </text:span><text:span text:style-name="T2">(122/11) </text:span> ⲉⲣⲉⲧⲛ̅ⲛ[ <text:line-break/><text:span text:style-name="T1"> </text:span><text:span text:style-name="T2">(122/12) </text:span> ⲉⲓⲙⲉ ϫⲉ.[ <text:line-break/><text:span text:style-name="T1"> </text:span><text:span text:style-name="T2">(122/13) </text:span> ⲉⲃⲟⲗ ⲙ̅ⲡϩⲱⲃ ⲡ[.........] <text:line-break/><text:span text:style-name="T1"> </text:span><text:span text:style-name="T2">(122/14) </text:span> ⲁⲩⲱ ⲛ̅ⲁⲣⲭⲱⲛ .[.........] <text:line-break/><text:span text:style-name="T1"> </text:span><text:span text:style-name="T2">(122/15) </text:span> ⲧⲱⲧⲙⲛ̅ⲧ ⲉⲣⲱⲧⲛ̅ ⲙ[........] <text:line-break/><text:span text:style-name="T1"> </text:span><text:span text:style-name="T2">(122/16) </text:span> ⲉⲙ·ⲙⲟⲛ ⲑⲟⲧⲉ ⲧϭⲟ[.......] <text:line-break/><text:span text:style-name="T1"> </text:span><text:span text:style-name="T2">(122/17) </text:span> ⲧⲉ ⲉϣⲱⲡⲉ ϭⲉ ⲉⲧⲉⲧⲛ̅ⲛⲁⲣ̅ϩⲟⲧ̣[ⲉ] <text:line-break/><text:span text:style-name="T1"> </text:span><text:span text:style-name="T2">(122/18) </text:span> ϩⲏⲧϥ̅ ⲙ̅ⲡⲉⲧⲛⲁⲧⲱⲙⲛ̅ⲧ ⲉⲣⲱⲧ[ⲛ̅] <text:line-break/><text:span text:style-name="T1"> </text:span><text:span text:style-name="T2">(122/19) </text:span> ⲡⲉⲧⲙ̅ⲙⲁⲩ ϥⲛⲁⲱⲙⲕⲧⲏⲟⲩⲧⲛ̣̅ <text:line-break/><text:span text:style-name="T1"> </text:span><text:span text:style-name="T2">(122/20) </text:span> ⲉⲡⲉⲓ ⲙⲛ̅ⲟⲩⲁ ⲉⲃⲟⲗ ⲛ̅ϩⲏⲧⲟⲩ ⲉϥⲛⲁ‐ <text:line-break/><text:span text:style-name="T1"> </text:span><text:span text:style-name="T2">(122/21) </text:span> ϯⲥⲟ ⲉⲣⲱⲧⲛ̅ ⲏ͂ ⲉϥⲛⲁⲛⲁⲉ ⲛ[ⲏ]ⲧ̣ⲛ̅ <text:line-break/><text:span text:style-name="T1"> </text:span><text:span text:style-name="T2">(122/22) </text:span> ⲁⲗⲗⲁ ⲛ̅ϯϩⲉ ϭⲱϣⲧ%6 ⲛ̅ⲥⲁ.[.. ⲛ̅] <text:line-break/><text:span text:style-name="T1"> </text:span><text:span text:style-name="T2">(122/23) </text:span> ϩⲣⲁⲓ̈ ⲛ̅ϩⲏⲧϥ̅· ⲉⲁⲧⲉⲧⲛ̅ϫⲣⲟ ⲉϣⲁ‐ <text:line-break/><text:span text:style-name="T1"> </text:span><text:span text:style-name="T2">(122/24) </text:span> ϫⲉ ⲛⲓⲙ ⲉⲧϩⲓϫⲙ̅ⲡⲕⲁϩ· ⲛ̅ⲧⲟϥ <text:line-break/><text:span text:style-name="T1"> </text:span><text:span text:style-name="T2">(123/1) </text:span> [.....]ϫ̣ⲓⲧⲏⲟⲩⲧⲛ̅ ⲉϩⲣⲁⲓ̈ ⲉⲡⲧⲟ <text:line-break/><text:span text:style-name="T1"> </text:span><text:span text:style-name="T2">(123/2) </text:span> [.....]ⲙ̣ⲁ ⲉⲧⲉⲙⲛ̅ⲁⲣⲭⲏ ⲛ̅ϩⲏⲧϥ̅ <text:line-break/><text:span text:style-name="T1"> </text:span><text:span text:style-name="T2">(123/3) </text:span> [....ⲧⲩ]ⲣⲁⲛⲛⲟⲥ ⲉⲧⲉⲧⲛ̅ϣⲁⲛ <text:line-break/><text:span text:style-name="T1"> </text:span><text:span text:style-name="T2">(123/4) </text:span> [......].ⲉ̣[ⲧ]ⲉⲧⲛ̅ⲛⲁⲛⲁⲩ ⲉⲛⲉⲧⲉ <text:line-break/><text:span text:style-name="T1"> </text:span><text:span text:style-name="T2">(123/5) </text:span> [.........].ⲟⲟⲩ ⲁⲩⲱ ⲟⲛ ⲧⲉ <text:line-break/><text:span text:style-name="T1"> </text:span><text:span text:style-name="T2">(123/6) </text:span> [ ⲧ]ⲁ̣ⲙⲟ ⲙ̅ⲙⲱⲧⲛ̅ ϫⲉ <text:line-break/><text:span text:style-name="T1"> </text:span><text:span text:style-name="T2">(123/7) </text:span> [ ]. ⲛ̅ϭⲓⲡⲗⲟⲅⲓⲥⲙⲟⲥ <text:line-break/><text:span text:style-name="T1"> </text:span><text:span text:style-name="T2">(123/8) </text:span> [ ]ⲗ̣ⲟⲅⲓⲥⲙⲟⲥ ⲉϥϣⲟ <text:line-break/><text:span text:style-name="T1"> </text:span><text:span text:style-name="T2">(123/9) </text:span> [ ]..ⲟⲥ ⲛ̅ⲧⲙⲏⲉ <text:line-break/><text:span text:style-name="T1"> </text:span><text:span text:style-name="T2">(123/10) </text:span> [ ]ⲟⲩ̣ⲁ̣ⲛ ⲁⲗⲗⲁ ⲥⲉ <text:line-break/><text:span text:style-name="T1"> </text:span><text:span text:style-name="T2">(123/11) </text:span> [ ] ⲛ̣̅ⲧ̣ⲱⲧⲛ̅ ⲇⲉ <text:line-break/><text:span text:style-name="T1"> </text:span><text:span text:style-name="T2">(123/12) </text:span> [ ].ⲛⲧⲙⲏⲉ ⲡⲁⲓ̈ <text:line-break/><text:span text:style-name="T1"> </text:span><text:span text:style-name="T2">(123/13) </text:span> [ ].ⲥ ⲉⲧⲟⲛϩ· ⲉⲧⲃⲉ <text:line-break/><text:span text:style-name="T1"> </text:span><text:span text:style-name="T2">(123/14) </text:span> [ ].ⲛ̅ⲡⲉⲧⲛ̅ⲣⲁϣⲉ <text:line-break/><text:span text:style-name="T1"> </text:span><text:span text:style-name="T2">(123/15) </text:span> [ ].ⲛ̅ ϭⲉ ϫⲉⲕⲁⲁⲥ <text:line-break/><text:span text:style-name="T1"> </text:span><text:span text:style-name="T2">(123/16) </text:span> [ ⲛ]ⲉⲧⲛ̅ⲯⲩⲭⲟⲟⲩⲉ <text:line-break/><text:span text:style-name="T1"> </text:span><text:span text:style-name="T2">(123/17) </text:span> [ ] ⲙ̣ⲏⲡⲟⲧⲉ ⲛ̅ϥ <text:line-break/><text:span text:style-name="T1"> </text:span><text:span text:style-name="T2">(123/18) </text:span> [ ] ⲛ̣̅ϭⲓⲡϣⲁϫⲉ <text:line-break/><text:span text:style-name="T1"> </text:span><text:span text:style-name="T2">(123/19) </text:span> [ ]ⲧ̣ⲁⲩⲧⲁⲗⲟ ⲙ̅ <text:line-break/><text:span text:style-name="T1"> </text:span><text:span text:style-name="T2">(123/20) </text:span> [......].[......]ⲱⲙ̅ⲡⲟⲩⲉϣ <text:line-break/><text:soft-page-break/><text:span text:style-name="T1"> </text:span><text:span text:style-name="T2">(123/21) </text:span> [.....]ϥ· ⲛ[......]ⲉⲡⲉⲧⲛ̅ⲥⲁⲛ <text:line-break/><text:span text:style-name="T1"> </text:span><text:span text:style-name="T2">(123/22) </text:span> [.....].ⲛ̅ⲡⲉ̣[.....]ⲟⲗ ⲁⲁϥ ⲛ̅ <text:line-break/><text:span text:style-name="T1"> </text:span><text:span text:style-name="T2">(123/23) </text:span> [ ]ⲃⲉ ⲡⲙⲁⲛ̅ <text:line-break/><text:span text:style-name="T1"> </text:span><text:span text:style-name="T2">(124/1) </text:span> ϫⲓⲟⲟⲣ ⲅⲁⲣ ⲟⲩϩⲟⲧⲉ ⲡⲉ ⲙ̅ⲡ[...ⲙ̅]‐ <text:line-break/><text:span text:style-name="T1"> </text:span><text:span text:style-name="T2">(124/2) </text:span> ⲧⲟ ⲉⲃⲟⲗ· ⲁⲗⲗⲁ ⲛ̅ⲧⲱⲧⲛ̅ ⲙ̣[ⲛ̅ⲟⲩ] <text:line-break/><text:span text:style-name="T1"> </text:span><text:span text:style-name="T2">(124/3) </text:span> ϩⲏⲧ%6 ⲛ̅ⲟⲩⲱⲧ%6 ⲡⲁⲣⲁⲅⲉ ⲙ̅ⲙ̣[ⲟϥ·] <text:line-break/><text:span text:style-name="T1"> </text:span><text:span text:style-name="T2">(124/4) </text:span> ⲡⲉϥϣⲓⲕ ⲅⲁⲣ ⲟⲩⲛⲟϭ ⲡⲉ̣[· ⲡⲉϥ]‐ <text:line-break/><text:span text:style-name="T1"> </text:span><text:span text:style-name="T2">(124/5) </text:span> ϫⲓⲥⲉ ⲟⲩⲛⲟϭ ⲉⲙⲁⲧ̣[ⲉ ⲡⲉ ....] <text:line-break/><text:span text:style-name="T1"> </text:span><text:span text:style-name="T2">(124/6) </text:span> ⲟⲩϩⲏⲧ%6 ⲛ̅ⲟⲩⲱⲧ%6 ϫ[.........] <text:line-break/><text:span text:style-name="T1"> </text:span><text:span text:style-name="T2">(124/7) </text:span> ⲁⲩⲱ ⲡⲕⲱϩⲧ%6 ⲉ.[.........] <text:line-break/><text:span text:style-name="T1"> </text:span><text:span text:style-name="T2">(124/8) </text:span> ⲡⲉⲙ̅ⲙⲟⲩⲉⲓⲱ.[ <text:line-break/><text:span text:style-name="T1"> </text:span><text:span text:style-name="T2">(124/9) </text:span> ⲛ̅ϭⲟⲙ ⲧⲏⲣ.[ <text:line-break/><text:span text:style-name="T1"> </text:span><text:span text:style-name="T2">(124/10) </text:span> ⲣⲱⲧⲛ̅ ⲥⲉⲛⲁ.[ <text:line-break/><text:span text:style-name="T1"> </text:span><text:span text:style-name="T2">(124/11) </text:span> ⲁⲩⲱ ⲛ̅ϭⲟ[ <text:line-break/><text:span text:style-name="T1"> </text:span><text:span text:style-name="T2">(124/12) </text:span> ⲛ̅ⲧⲟⲟⲩ ⲡ[ <text:line-break/><text:span text:style-name="T1"> </text:span><text:span text:style-name="T2">(124/13) </text:span> ⲉϩⲏ· ϯⲧⲁⲙ.[ <text:line-break/><text:span text:style-name="T1"> </text:span><text:span text:style-name="T2">(124/14) </text:span> ϯⲯⲩⲭⲏ ⲛ̅ⲧⲟ[ <text:line-break/><text:span text:style-name="T1"> </text:span><text:span text:style-name="T2">(124/15) </text:span> ϣⲱⲡⲉ ⲛ̅ⲛⲟ[ <text:line-break/><text:span text:style-name="T1"> </text:span><text:span text:style-name="T2">(124/16) </text:span> ϩⲛ̅ⲟⲩⲟⲛ ⲛⲓⲙ̣[ <text:line-break/><text:span text:style-name="T1"> </text:span><text:span text:style-name="T2">(124/17) </text:span> ⲧⲱⲧⲛ̅ ⲛⲉ ⲛ̅.[ <text:line-break/><text:span text:style-name="T1"> </text:span><text:span text:style-name="T2">(124/18) </text:span> ⲁⲩⲱ ϫⲉⲛ̅ⲧ[ <text:line-break/><text:span text:style-name="T1"> </text:span><text:span text:style-name="T2">(124/19) </text:span> ⲡⲱⲃϣ ⲁⲛ[ <text:line-break/><text:span text:style-name="T1"> </text:span><text:span text:style-name="T2">(124/20) </text:span> ⲛ̅ϣⲏⲣⲉ ⲙ[ <text:line-break/><text:span text:style-name="T1"> </text:span><text:span text:style-name="T2">(124/21) </text:span> ⲁⲩⲱ ⲉⲧⲉⲧⲛ̣̅[.....]ⲩⲛ[....] <text:line-break/><text:span text:style-name="T1"> </text:span><text:span text:style-name="T2">(124/22) </text:span> ⲛ̅ⲧⲱⲧⲛ̅ .[.....]ⲉⲙ̅ⲡ[....] <text:line-break/><text:span text:style-name="T1"> </text:span><text:span text:style-name="T2">(124/23) </text:span> ⲡⲉϫⲁϥ ⲛ̅[ϭⲓⲙⲁⲑ]ⲑⲁⲓⲟⲥ̣ [ϫⲉ..] <text:line-break/><text:span text:style-name="T1"> </text:span><text:span text:style-name="T2">(124/24) </text:span> ⲁϣ ⲛ̅ϩⲉ [ <text:line-break/><text:span text:style-name="T1"> </text:span><text:span text:style-name="T2">(125/1) </text:span> [ ]ⲡ̣ⲉϫⲁϥ ⲛ̅ϭⲓⲡⲥ̅ⲏ̅ⲣ̅ <text:line-break/><text:span text:style-name="T1"> </text:span><text:span text:style-name="T2">(125/2) </text:span> [ϫⲉ ].ⲱⲛⲛⲉⲧⲛ̅ϩⲏⲧⲕ <text:line-break/><text:span text:style-name="T1"> </text:span><text:span text:style-name="T2">(125/3) </text:span> [ ].ⲛⲁϣⲱϫⲡ%6 ⲛ̅ⲧⲟⲕ <text:line-break/><text:span text:style-name="T1"> </text:span><text:span text:style-name="T2">(125/4) </text:span> [ ]ⲓ̈ⲟⲩⲇⲁⲥ ϫⲉⲡϫⲟⲉⲓⲥ <text:line-break/><text:span text:style-name="T1"> </text:span><text:span text:style-name="T2">(125/5) </text:span> [ ]ⲉ ⲉⲛⲉϩⲃⲏⲟⲩⲉ <text:line-break/><text:span text:style-name="T1"> </text:span><text:span text:style-name="T2">(125/6) </text:span> [ ].ⲓⲯⲩⲭⲟⲟⲩⲉ ⲛⲁⲓ̈ <text:line-break/><text:span text:style-name="T1"> </text:span><text:span text:style-name="T2">(125/7) </text:span> [ ]ⲛⲓⲕⲟⲩⲉⲓ ϩⲟⲧⲁⲛ <text:line-break/><text:span text:style-name="T1"> </text:span><text:span text:style-name="T2">(125/8) </text:span> [ ⲉ ϣⲁ{ⲛ} ]ⲩⲛⲁϣⲱⲡⲉ ⲧⲱⲛ <text:line-break/><text:span text:style-name="T1"> </text:span><text:span text:style-name="T2">(125/9) </text:span> [ ].[..].ⲁⲛ ϫⲉⲡ%6ⲡ̅ⲛ̅ⲁ̅ <text:line-break/><text:span text:style-name="T1"> </text:span><text:span text:style-name="T2">(125/10) </text:span> [ ⲡⲉϫⲁ]ϥ̣ ⲛ̅ϭⲓⲡϫⲟⲉⲓⲥ <text:line-break/><text:span text:style-name="T1"> </text:span><text:span text:style-name="T2">(125/11) </text:span> [ϫⲉ ]ⲡ%6 ⲉⲩⲛ̅ <text:line-break/><text:span text:style-name="T1"> </text:span><text:span text:style-name="T2">(125/12) </text:span> [ ]ⲡ̣ⲁⲣⲁⲗⲁⲙ <text:line-break/><text:span text:style-name="T1"> </text:span><text:span text:style-name="T2">(125/13) </text:span> [ⲃⲁⲛⲉ ⲙ̅ⲙ]ⲟⲟⲩ ⲛⲁⲓ̈ ⲙⲉⲩⲙⲟⲩ· <text:line-break/><text:span text:style-name="T1"> </text:span><text:span text:style-name="T2">(125/14) </text:span> [......]. ⲙⲉⲩⲧⲁⲕⲟ ϫⲉⲁⲩⲥⲟⲩⲱⲛ <text:line-break/><text:span text:style-name="T1"> </text:span><text:span text:style-name="T2">(125/15) </text:span> [...]ⲥ̣ⲩⲛⲍⲩⲅⲟⲥ ⲁⲩⲱ ⲡⲉⲧⲛⲁϣⲟ‐ <text:line-break/><text:span text:style-name="T1"> </text:span><text:span text:style-name="T2">(125/16) </text:span> [ⲡⲟ]ⲩ̣ ⲉⲣⲟϥ· ⲧⲙⲏⲉ ⲅⲁⲣ ϣⲁⲥϣⲓⲛⲉ <text:line-break/><text:span text:style-name="T1"> </text:span><text:span text:style-name="T2">(125/17) </text:span> [ⲛ̅ⲥⲁ]ⲡ̣ⲥⲁⲃⲉ ⲙⲛ̅ⲡⲇⲓⲕⲁⲓⲟⲥ· ⲡⲉ‐ <text:line-break/><text:span text:style-name="T1"> </text:span><text:span text:style-name="T2">(125/18) </text:span> [ϫⲁϥ ⲛ̅ϭ]ⲓ̣ⲡⲥⲱⲧⲏⲣ ϫⲉⲡϩⲏⲃⲥ̅ <text:line-break/><text:span text:style-name="T1"> </text:span><text:span text:style-name="T2">(125/19) </text:span> [ⲙ̅ⲡⲥ]ⲱⲙⲁ ⲡⲉ ⲡⲛⲟⲩⲥ ⲉⲫ ⲟⲥⲟⲛ <text:line-break/><text:span text:style-name="T1"> </text:span><text:span text:style-name="T2">(125/20) </text:span> [ⲛⲉⲧⲛ̅ϩⲏ]ⲧⲕ ⲥⲟⲩⲧⲱⲛ ⲉⲧⲉⲧⲁⲓ̈ ⲧⲉ <text:line-break/><text:soft-page-break/><text:span text:style-name="T1"> </text:span><text:span text:style-name="T2">(125/21) </text:span> [.....].ⲥ ⲛⲉⲧⲛ̅ⲥⲱⲙⲁ ϩⲉⲛⲟⲩ <text:line-break/><text:span text:style-name="T1"> </text:span><text:span text:style-name="T2">(125/22) </text:span> [ⲟⲉⲓⲛ] ⲛⲉ· ⲉⲫ ⲟⲥⲟⲛ ⲡⲉⲧⲛ̅ϩⲏⲧ%6 <text:line-break/><text:span text:style-name="T1"> </text:span><text:span text:style-name="T2">(125/23) </text:span> [ⲟⲩⲕⲁ]ⲕ̣ⲉ ⲡⲉ· ⲡⲉⲧⲛ̅ⲟⲩⲟⲉⲓⲛ ⲉⲧⲉⲧⲛ̅ <text:line-break/><text:span text:style-name="T1"> </text:span><text:span text:style-name="T2">(126/1) </text:span> ϭⲱϣⲧ%6 ⲉⲃⲟⲗ ϩⲏ[ⲧϥ̅ <text:line-break/><text:span text:style-name="T1"> </text:span><text:span text:style-name="T2">(126/2) </text:span> ⲁⲛⲟⲕ ⲁⲉⲓⲙⲟⲩⲧ[ <text:line-break/><text:span text:style-name="T1"> </text:span><text:span text:style-name="T2">(126/3) </text:span> ϫⲉ ϯⲛⲁⲃⲱⲕ ϫ[ <text:line-break/><text:span text:style-name="T1"> </text:span><text:span text:style-name="T2">(126/4) </text:span> ⲙ̅ⲡⲁϣⲁϫⲉ ϩⲁⲧ[ <text:line-break/><text:span text:style-name="T1"> </text:span><text:span text:style-name="T2">(126/5) </text:span> ϯⲧⲛ̅ⲛⲟⲟⲩ ϣⲁ̣[ ⲡⲉϫⲁⲩ {ⲛⲁϥ}] <text:line-break/><text:span text:style-name="T1"> </text:span><text:span text:style-name="T2">(126/6) </text:span> ⲛ̅ϭⲓⲛⲉϥⲙⲁⲑⲏⲧ[ⲏⲥ ϫⲉⲡϫⲟⲉⲓⲥ] <text:line-break/><text:span text:style-name="T1"> </text:span><text:span text:style-name="T2">(126/7) </text:span> ⲛⲓⲙ ⲡⲉⲧϣⲓⲛⲉ ⲏ̣͂ [.........] <text:line-break/><text:span text:style-name="T1"> </text:span><text:span text:style-name="T2">(126/8) </text:span> ϭⲱⲗⲡ%6 ⲉⲃⲟⲗ· ⲡⲉϫ[ ⲡϫⲟⲉⲓⲥ ] <text:line-break/><text:span text:style-name="T1"> </text:span><text:span text:style-name="T2">(126/9) </text:span> ϫⲉⲡⲉⲧϣⲓⲛⲉ̣ [ <text:line-break/><text:span text:style-name="T1"> </text:span><text:span text:style-name="T2">(126/10) </text:span> ϭⲱⲗⲡ%6 ⲉⲃⲟⲗ ⲡ[ ⲡⲉϫⲁϥ {ⲛⲁϥ}] <text:line-break/><text:span text:style-name="T1"> </text:span><text:span text:style-name="T2">(126/11) </text:span> ⲛ̅ϭⲓⲙⲁⲑ̣[ⲑⲁⲓⲟⲥ ϫⲉⲡϫⲟⲉⲓⲥ ϩⲟ]‐ <text:line-break/><text:span text:style-name="T1"> </text:span><text:span text:style-name="T2">(126/12) </text:span> ⲧⲁⲛ ⲉⲉⲓϣ[ⲁ{ⲛ} <text:line-break/><text:span text:style-name="T1"> </text:span><text:span text:style-name="T2">(126/13) </text:span> ⲛ̅ⲧⲁϣⲁϫⲉ ⲛⲓⲙ ⲡⲉⲧ.[.......] <text:line-break/><text:span text:style-name="T1"> </text:span><text:span text:style-name="T2">(126/14) </text:span> ⲡⲉⲧⲥⲱⲧⲙ̅· ⲡⲉϫⲁϥ ⲛ̅ϭ̣ⲓ̣ⲡ̣[ϫⲟⲉⲓⲥ] <text:line-break/><text:span text:style-name="T1"> </text:span><text:span text:style-name="T2">(126/15) </text:span> ϫⲉⲡⲉⲧϣⲁϫⲉ ⲛ̅ⲧⲟϥ ⲟⲛ ⲡⲉⲧⲥ[ⲱⲧⲙ̅] <text:line-break/><text:span text:style-name="T1"> </text:span><text:span text:style-name="T2">(126/16) </text:span> ⲁⲩⲱ ⲡⲉⲧⲛⲁⲩ ⲉⲃⲟⲗ ⲛ̅ⲧⲟϥ ⲟⲛ [ⲡⲉ]‐ <text:line-break/><text:span text:style-name="T1"> </text:span><text:span text:style-name="T2">(126/17) </text:span> ⲧϭⲱⲗⲡ%6 ⲉⲃⲟⲗ· ⲡⲉϫⲁⲥ ⲛ̅ϭⲓⲙ̣[ⲁⲣⲓ] <text:line-break/><text:span text:style-name="T1"> </text:span><text:span text:style-name="T2">(126/18) </text:span> ϩⲁⲙ ϫⲉⲡϫⲟⲉⲓⲥ· ⲉⲓⲥϩⲏⲏ̣[ⲧⲉ ..] <text:line-break/><text:span text:style-name="T1"> </text:span><text:span text:style-name="T2">(126/19) </text:span> ⲫⲟⲣⲓ ⲙ̅ⲡⲥⲱⲙⲁ ⲉⲃⲟⲗ ⲧⲱⲛ [ⲉⲉⲓ] <text:line-break/><text:span text:style-name="T1"> </text:span><text:span text:style-name="T2">(126/20) </text:span> ⲣⲓⲙⲉ ⲏ͂ ⲉⲃⲟⲗ ⲧⲱⲛ ⲉⲉⲓ̣[.....] <text:line-break/><text:span text:style-name="T1"> </text:span><text:span text:style-name="T2">(126/21) </text:span> ⲡⲉϫⲁϥ ⲛ̅ϭⲓⲡϫⲟⲉⲓⲥ ϫⲉ[.....] <text:line-break/><text:span text:style-name="T1"> </text:span><text:span text:style-name="T2">(126/22) </text:span> ⲣⲓⲙⲉ ⲉⲧⲃⲉⲛⲉϥϩⲃⲏⲟⲩⲉ [.....] <text:line-break/><text:span text:style-name="T1"> </text:span><text:span text:style-name="T2">(126/23) </text:span> ϣⲱϫⲡ ⲁⲩⲱ ⲡⲛⲟⲩⲥ ⲥⲱⲃⲉ̣ [.].[.] <text:line-break/><text:span text:style-name="T1"> </text:span><text:span text:style-name="T2">(127/1) </text:span> [........].ⲉⲡ̅ⲛ̅ⲁ̅ ⲉⲣⲧⲙ̅ⲧⲉⲟⲩⲁ <text:line-break/><text:span text:style-name="T1"> </text:span><text:span text:style-name="T2">(127/2) </text:span> [ ]ⲕⲁⲕⲉ ϥⲛⲁϣⲛⲁⲩ <text:line-break/><text:span text:style-name="T1"> </text:span><text:span text:style-name="T2">(127/3) </text:span> [.........]ϯⲧⲁⲙⲟ ϭⲉ ⲙ̅ⲙⲱⲧⲛ̅ <text:line-break/><text:span text:style-name="T1"> </text:span><text:span text:style-name="T2">(127/4) </text:span> [ ]ⲟ̣ⲩⲟⲉⲓⲛ ⲡⲉ ⲡⲕⲁⲕⲉ <text:line-break/><text:span text:style-name="T1"> </text:span><text:span text:style-name="T2">(127/5) </text:span> [ ]ⲁ̣ⲱϩⲉ ⲉⲣⲁⲧϥ̅ ϩⲙ̅ <text:line-break/><text:span text:style-name="T1"> </text:span><text:span text:style-name="T2">(127/6) </text:span> [.........]ⲛ̣ⲁⲩ ⲁⲛ ⲉⲡⲟⲩⲟⲉⲓⲛ <text:line-break/><text:span text:style-name="T1"> </text:span><text:span text:style-name="T2">(127/7) </text:span> [ ]ⲡϭⲟⲗ [ ].ⲁⲩ̣ϥⲓⲧ̣ⲟ̣ⲩ ⲉⲃⲟⲗ ϩⲛ̅ <text:line-break/><text:span text:style-name="T1"> </text:span><text:span text:style-name="T2">(127/8) </text:span> [ ]ϭ[...]ⲱⲥ· ⲧⲉⲧⲛⲁϯ <text:line-break/><text:span text:style-name="T1"> </text:span><text:span text:style-name="T2">(127/9) </text:span> [ ]ⲉⲓⲛ ⲁⲩⲱ <text:line-break/><text:span text:style-name="T1"> </text:span><text:span text:style-name="T2">(127/10) </text:span> [ ϣ]ⲟ̣ⲟⲡ%6 ϣⲁⲉⲛⲉϩ· <text:line-break/><text:span text:style-name="T1"> </text:span><text:span text:style-name="T2">(127/11) </text:span> [ ].ⲛ̅ⲧⲙⲛ̅ⲧ <text:line-break/><text:span text:style-name="T1"> </text:span><text:span text:style-name="T2">(127/12) </text:span> [ ]ⲛ̣ⲉⲛ̅ⲟⲩⲁ <text:line-break/><text:span text:style-name="T1"> </text:span><text:span text:style-name="T2">(127/13) </text:span> [ ]ⲉ̣ⲛⲉϩ ⲧⲟⲧⲉ ⲥⲉⲛⲁ <text:line-break/><text:span text:style-name="T1"> </text:span><text:span text:style-name="T2">(127/14) </text:span> [.....]ⲍⲉ ⲙ̣̅ⲙⲱⲧⲛ̅ ⲛ̅ϭⲓⲛ̅ϭⲟⲙ <text:line-break/><text:span text:style-name="T1"> </text:span><text:span text:style-name="T2">(127/15) </text:span> [....]ⲩ ⲉⲧⲙ̅ⲡⲥⲁⲛⲧⲡⲉ· ⲁⲩⲱ ⲛⲉ <text:line-break/><text:span text:style-name="T1"> </text:span><text:span text:style-name="T2">(127/16) </text:span> [ⲧⲙ̅ⲡ]ⲥ̣ⲁⲛⲡⲓⲧⲛ̅· ϩⲙ̅ⲡⲙⲁ ⲉⲧⲙ̅ⲙⲁⲩ <text:line-break/><text:span text:style-name="T1"> </text:span><text:span text:style-name="T2">(127/17) </text:span> [ⲉϥⲛⲁ]ϣ̣ⲱⲡⲉ ⲛ̅ϭⲓⲡⲣⲓⲙⲉ ⲙⲛ̅ <text:line-break/><text:span text:style-name="T1"> </text:span><text:span text:style-name="T2">(127/18) </text:span> [ⲡ....] ⲛ̣̅ⲛ̅ⲟⲃϩⲉ ⲉϫⲛ̅ⲑⲁⲏ ⲛ̅ⲛⲁⲓ̈ ⲧⲏ‐ <text:line-break/><text:span text:style-name="T1"> </text:span><text:span text:style-name="T2">(127/19) </text:span> [ⲣⲟⲩ· ⲡ]ⲉϫⲁϥ ⲛ̅ϭⲓⲓ̈ⲟⲩⲇⲁⲥ ϫⲉⲁϫⲓⲥ <text:line-break/><text:span text:style-name="T1"> </text:span><text:span text:style-name="T2">(127/20) </text:span> [ⲉⲣⲟⲛ ⲡϫ]ⲟⲉⲓⲥ ϫⲉϩⲁⲑⲏ ⲉⲙⲡⲁⲧⲉ <text:line-break/><text:span text:style-name="T1"> </text:span><text:span text:style-name="T2">(127/21) </text:span> [ⲧⲡⲉ ⲙⲛ̅]ⲡ̣ⲕⲁϩ ϣⲱⲡⲉ· ⲛⲉⲟⲩ ⲡⲉ <text:line-break/><text:soft-page-break/><text:span text:style-name="T1"> </text:span><text:span text:style-name="T2">(127/22) </text:span> [......] ⲡⲉϫⲁϥ ⲛ̅ϭⲓⲡϫⲟⲉⲓⲥ ϫⲉ <text:line-break/><text:span text:style-name="T1"> </text:span><text:span text:style-name="T2">(127/23) </text:span> [ⲟⲩ]ⲕ̣ⲁⲕⲉ ⲡⲉ ⲙⲛ̅ⲟⲩⲙⲟⲟⲩ ⲁⲩⲱ <text:line-break/><text:span text:style-name="T1"> </text:span><text:span text:style-name="T2">(128/1) </text:span> ⲟⲩⲡ̣̅̅ⲛ̅ⲁ̅ ⲉϥϩⲓϫⲛ̅ⲟⲩⲙ̣[ⲟⲟⲩ· ⲁⲛⲟⲕ] <text:line-break/><text:span text:style-name="T1"> </text:span><text:span text:style-name="T2">(128/2) </text:span> ⲇⲉ ϯϫⲱ ⲙ̅ⲙⲟⲥ ⲛ[ⲏⲧⲛ̅ ϫⲉ....] <text:line-break/><text:span text:style-name="T1"> </text:span><text:span text:style-name="T2">(128/3) </text:span> ⲡⲉⲧⲉⲧⲛ̅ϣⲓⲛⲉ ⲛ̅ⲥⲱ̣[........] <text:line-break/><text:span text:style-name="T1"> </text:span><text:span text:style-name="T2">(128/4) </text:span> ϩⲟⲧϩⲧ%6 ⲛ̅ⲥⲱϥ ⲉⲓⲥ̣[.........] <text:line-break/><text:span text:style-name="T1"> </text:span><text:span text:style-name="T2">(128/5) </text:span> ϩⲛ̅ⲧⲏⲛⲟⲩ ⲁⲩ.[.........] <text:line-break/><text:span text:style-name="T1"> </text:span><text:span text:style-name="T2">(128/6) </text:span> ⲛ̅ⲧϭⲟⲙ ⲙⲛ̅ⲡⲙⲩⲥ̣[ⲧⲏⲣⲓⲟⲛ ...] <text:line-break/><text:span text:style-name="T1"> </text:span><text:span text:style-name="T2">(128/7) </text:span> ⲡ̅ⲛ̅ⲁ̅ ϫⲉⲉⲃⲟⲗ ⲛ̅ϩ[.........] <text:line-break/><text:span text:style-name="T1"> </text:span><text:span text:style-name="T2">(128/8) </text:span> ⲧⲕⲁⲕⲓⲁ ⲉⲓ ⲉ[ <text:line-break/><text:span text:style-name="T1"> </text:span><text:span text:style-name="T2">(128/9) </text:span> ⲡⲛⲟⲩⲥ ⲙ̅.[ <text:line-break/><text:span text:style-name="T1"> </text:span><text:span text:style-name="T2">(128/10) </text:span> ⲉⲓⲥϩⲏⲏⲧⲉ ⲉ[ <text:line-break/><text:span text:style-name="T1"> </text:span><text:span text:style-name="T2">(128/11) </text:span> ⲛⲉⲙ̅ⲡ.[ <text:line-break/><text:span text:style-name="T1"> </text:span><text:span text:style-name="T2">(128/12) </text:span> ⲡⲉϫⲁϥ ⲛ[ ϫⲉⲡϫⲟ]‐ <text:line-break/><text:span text:style-name="T1"> </text:span><text:span text:style-name="T2">(128/13) </text:span> ⲉⲓⲥ ⲁϫⲓⲥ ⲉⲣⲟⲛ ϫ̣[ⲉⲧ.... ⲉⲥⲱ]‐ <text:line-break/><text:span text:style-name="T1"> </text:span><text:span text:style-name="T2">(128/14) </text:span> ϩⲉ ⲉⲣⲁⲧⲥ̅ ⲧⲱⲛ ⲁⲩⲱ ⲡ̣ⲛ̣[ⲟⲩⲥ ⲙ̅]‐ <text:line-break/><text:span text:style-name="T1"> </text:span><text:span text:style-name="T2">(128/15) </text:span> ⲙⲏⲉ ⲉϥϣⲟⲟⲡ%6 ⲧⲱⲛ· ⲡⲉ[ϫⲁϥ] <text:line-break/><text:span text:style-name="T1"> </text:span><text:span text:style-name="T2">(128/16) </text:span> ⲛ̅ϭⲓⲡϫⲟⲉⲓⲥ ϫⲉⲡⲕⲱϩⲧ%6 ⲙ̣̅[ⲡⲉ] <text:line-break/><text:span text:style-name="T1"> </text:span><text:span text:style-name="T2">(128/17) </text:span> ⲡ̅ⲛ̅ⲁ̅ ⲛ̅ⲧⲁϥϣⲱⲡⲉ ⲛ̅ⲧⲟⲩ[...] <text:line-break/><text:span text:style-name="T1"> </text:span><text:span text:style-name="T2">(128/18) </text:span> ⲙ̅ⲡⲉⲥⲛⲁⲩ ⲉⲧⲃⲉⲡⲁⲓ̈ ⲁⲡ[...] <text:line-break/><text:span text:style-name="T1"> </text:span><text:span text:style-name="T2">(128/19) </text:span> ϣⲱⲡⲉ· ⲁϥϣⲱⲡⲉ ⲛ̅ϩⲣⲁ[ⲓ̈ ⲛ̅ϩⲏ]‐ <text:line-break/><text:span text:style-name="T1"> </text:span><text:span text:style-name="T2">(128/20) </text:span> ⲧⲟⲩ ⲛ̅ϭⲓⲡⲛⲟⲩⲥ ⲙ̅ⲙⲏ̣[ⲉ ....] <text:line-break/><text:span text:style-name="T1"> </text:span><text:span text:style-name="T2">(128/21) </text:span> ⲡⲉ ⲉⲣϣⲁⲟⲩⲣⲱⲙⲉ ⲧⲁ[ϩⲉⲧⲯⲩ]‐ <text:line-break/><text:span text:style-name="T1"> </text:span><text:span text:style-name="T2">(128/22) </text:span> ⲭⲏ ⲉⲣⲁⲧⲥ̅ ϩⲙ̅ⲡϫⲓⲥⲉ ⲧⲟⲧ[ⲉ ...] <text:line-break/><text:span text:style-name="T1"> </text:span><text:span text:style-name="T2">(128/23) </text:span> ϫⲓⲥⲉ· ⲙⲁⲑ·ⲑⲁⲓⲟⲥ ⲇⲉ ⲁϥϫ̣ⲛ̣ⲟ̣[ⲩϥ] <text:line-break/><text:span text:style-name="T1"> </text:span><text:span text:style-name="T2">(129/1) </text:span> [ ]ⲃⲉ ⲛ̅ⲧⲁϥϫⲓⲧϥ̅ ⲛ̅ϭⲓ <text:line-break/><text:span text:style-name="T1"> </text:span><text:span text:style-name="T2">(129/2) </text:span> [ ]ⲉ ⲛ̅ⲧⲟϥ ⲡⲉ ⲉⲧ̓ⲧⲁ <text:line-break/><text:span text:style-name="T1"> </text:span><text:span text:style-name="T2">(129/3) </text:span> [ ⲡⲉϫⲁ]ϥ ⲛ̅ϭⲓⲡϫⲟⲉⲓⲥ ϫⲉ <text:line-break/><text:span text:style-name="T1"> </text:span><text:span text:style-name="T2">(129/4) </text:span> [........ⲧ]ⲁ̣ϫⲣⲏⲟⲩⲧ̓ ⲉⲡⲉⲧⲛ̅ <text:line-break/><text:span text:style-name="T1"> </text:span><text:span text:style-name="T2">(129/5) </text:span> [.........].ⲃⲟⲗ ⲙ̅ⲙⲱⲧⲛ̅ ⲙ̅ <text:line-break/><text:span text:style-name="T1"> </text:span><text:span text:style-name="T2">(129/6) </text:span> [......].[..]. ⲙ̅ⲙⲟϥ ⲉⲟⲩⲁϩϥ̅ <text:line-break/><text:span text:style-name="T1"> </text:span><text:span text:style-name="T2">(129/7) </text:span> [ⲛ̅ⲥⲱ]ⲧ̣ⲛ̅ ⲁⲩⲱ ⲛ̅ϩⲃⲏⲟⲩⲉ ⲧⲏⲣⲟⲩ <text:line-break/><text:span text:style-name="T1"> </text:span><text:span text:style-name="T2">(129/8) </text:span> [.....]ⲡ̣ⲉⲧⲛ̅ϩⲏⲧ%6 ⲛ̅ⲑⲉ ⲅⲁⲣ ⲉⲧⲟⲩ <text:line-break/><text:span text:style-name="T1"> </text:span><text:span text:style-name="T2">(129/9) </text:span> [.....] ⲙ̅ⲙⲟⲥ ⲛ̅ϭⲓⲛⲉⲧⲛ̅ϩⲏⲧ%6 ⲉⲧⲉ <text:line-break/><text:span text:style-name="T1"> </text:span><text:span text:style-name="T2">(129/10) </text:span> [....]ⲑⲉ ⲉⲧⲉⲧⲛⲁϫⲣⲟ ⲉⲛϭⲟⲙ ⲉⲧⲙ̅‐ <text:line-break/><text:span text:style-name="T1"> </text:span><text:span text:style-name="T2">(129/11) </text:span> [ⲡⲥⲁⲛⲧ]ⲡⲉ ⲙⲛ̅ⲛⲉⲧⲛ̅ⲡⲥⲁⲛⲡⲓⲧⲛ̅ <text:line-break/><text:span text:style-name="T1"> </text:span><text:span text:style-name="T2">(129/12) </text:span> [......] ϯϫⲱ ⲙ̅ⲙⲟⲥ ⲛⲏⲧⲛ̅ ϫⲉ <text:line-break/><text:span text:style-name="T1"> </text:span><text:span text:style-name="T2">(129/13) </text:span> [ⲡⲉⲧⲉ...]ⲧ̣ϥ̅ϭⲟⲙ ⲙⲁⲣⲉϥⲣ̅ⲁⲣⲛⲁ ⲙ̅ <text:line-break/><text:span text:style-name="T1"> </text:span><text:span text:style-name="T2">(129/14) </text:span> [.... ⲛ̅ϥⲙⲉ]ⲧⲁⲛⲟⲉⲓ ⲁⲩⲱ ⲡⲉⲧⲥⲟ <text:line-break/><text:span text:style-name="T1"> </text:span><text:span text:style-name="T2">(129/15) </text:span> [... ⲙⲁ]ⲣ̣ⲉϥϣⲓⲛⲉ ⲛ̅ϥϭⲓⲛⲉ ⲛ̅ϥⲣⲁ‐ <text:line-break/><text:span text:style-name="T1"> </text:span><text:span text:style-name="T2">(129/16) </text:span> [ϣⲉ· ⲡⲉ]ϫⲁϥ ⲛ̅ϭⲓⲓ̈ⲟⲩⲇⲁⲥ ϫⲉⲉⲓⲥϩⲏ‐ <text:line-break/><text:span text:style-name="T1"> </text:span><text:span text:style-name="T2">(129/17) </text:span> [ⲏⲧⲉ .]ⲛⲁⲩ ϫⲉϩⲱⲃ ⲛⲓⲙ ⲥⲉϣⲟⲟⲡ%6 <text:line-break/><text:span text:style-name="T1"> </text:span><text:span text:style-name="T2">(129/18) </text:span> [.....] ⲛ̅ⲑⲉ ⲛ̅ⲛⲓⲙⲁⲉⲓⲛ ⲉⲧϩⲓϫⲙ̅ <text:line-break/><text:span text:style-name="T1"> </text:span><text:span text:style-name="T2">(129/19) </text:span> [....] ⲉ̣ⲧⲃⲉⲡⲁⲓ̈ ⲁⲩϣⲱⲡⲉ ⲛ̅ϯϩⲉ <text:line-break/><text:span text:style-name="T1"> </text:span><text:span text:style-name="T2">(129/20) </text:span> [ⲡⲉϫⲁϥ] ⲛ̣̅ϭⲓⲡϫⲟⲉⲓⲥ ϫⲉ ⲛ̅ⲧⲉⲣⲉⲡⲉⲓ‐ <text:line-break/><text:span text:style-name="T1"> </text:span><text:span text:style-name="T2">(129/21) </text:span> [ⲱⲧ%6 ⲧⲁϩ]ⲟ̣ ⲉⲣⲁⲧϥ̅ ⲙ̅ⲡⲕⲟⲥⲙⲟⲥ ⲁϥ <text:line-break/><text:span text:style-name="T1"> </text:span><text:span text:style-name="T2">(129/22) </text:span> [.....]ⲟⲩⲙⲟⲟⲩ ⲉⲃⲟⲗ ⲛ̅ϩⲏⲧϥ̅· <text:line-break/><text:soft-page-break/><text:span text:style-name="T1"> </text:span><text:span text:style-name="T2">(129/23) </text:span> [....]ⲗ̣ⲟⲅⲟⲥ ⲉⲓ ⲉⲃⲟⲗ ⲙ̅ⲙⲟϥ· <text:line-break/><text:span text:style-name="T1"> </text:span><text:span text:style-name="T2">(130/1) </text:span> ⲁϥϣⲱⲡⲉ ϩⲛ̅ϩⲁϩ ⲛ̅[........] <text:line-break/><text:span text:style-name="T1"> </text:span><text:span text:style-name="T2">(130/2) </text:span> ⲁϥϫⲓⲥⲉ ⲛ̅ϩⲟⲩⲟ ⲉⲑⲓ[ⲏ .......] <text:line-break/><text:span text:style-name="T1"> </text:span><text:span text:style-name="T2">(130/3) </text:span> ⲧⲉ ⲉⲡⲕⲁϩ ⲧⲏⲣϥ ⲁⲩ[........] <text:line-break/><text:span text:style-name="T1"> </text:span><text:span text:style-name="T2">(130/4) </text:span> ϫⲉⲡⲙⲟⲟⲩ ⲉⲧⲥⲟⲟⲩ[ϩ .......] <text:line-break/><text:span text:style-name="T1"> </text:span><text:span text:style-name="T2">(130/5) </text:span> ϣⲟⲟⲡ%6 ⲙ̅ⲡⲉⲩⲃⲟⲗ· [.........] <text:line-break/><text:span text:style-name="T1"> </text:span><text:span text:style-name="T2">(130/6) </text:span> ⲙ̅ⲡⲙⲟⲟⲩ ⲟⲩⲛⲟϭ ⲛ̅ⲕ̣ⲱϩⲧ̣%6 ⲉϥ̣[ⲕⲱ]‐ <text:line-break/><text:span text:style-name="T1"> </text:span><text:span text:style-name="T2">(130/7) </text:span> ⲧⲉ ⲉⲣⲟⲟⲩ ⲛ̅ⲑⲉ ⲛ̅ⲛⲓⲥⲟⲃⲧ%6 ⲁⲩ.[..] <text:line-break/><text:span text:style-name="T1"> </text:span><text:span text:style-name="T2">(130/8) </text:span> ⲛ̅ⲥⲟⲡ%6 ⲛ̅ⲧⲉⲣⲉϩⲁϩ ⲡⲱⲣϫ ⲙ̣̅[ⲡⲉ]‐ <text:line-break/><text:span text:style-name="T1"> </text:span><text:span text:style-name="T2">(130/9) </text:span> ⲧⲙ̅ⲡⲥⲁⲛϩⲟⲩⲛ ⲛ̅ⲧⲉⲣⲉⲡ[...] <text:line-break/><text:span text:style-name="T1"> </text:span><text:span text:style-name="T2">(130/10) </text:span> ⲱϩⲉ ⲉⲣⲁⲧϥ̅· ⲁϥϭⲱϣⲧ%6 ⲉ.[...] <text:line-break/><text:span text:style-name="T1"> </text:span><text:span text:style-name="T2">(130/11) </text:span> ⲡⲉϫⲁϥ ⲛⲁϥ ϫⲉⲃⲱⲕ ⲛ̅ⲅⲛ[....] <text:line-break/><text:span text:style-name="T1"> </text:span><text:span text:style-name="T2">(130/12) </text:span> ⲉⲃⲟⲗ ⲛ̅ϩⲏⲧⲕ· ϫⲉⲕⲁⲁⲥ ⲛ̅ⲛ̣[....] <text:line-break/><text:span text:style-name="T1"> </text:span><text:span text:style-name="T2">(130/13) </text:span> ϭⲣⲱϩ ϫⲛ̅ⲛ̅ϫⲱⲙ ϣⲁϫ[ⲱⲙ ⲁⲩ]‐ <text:line-break/><text:span text:style-name="T1"> </text:span><text:span text:style-name="T2">(130/14) </text:span> ⲱ ϫⲛ̅ⲉⲛⲉϩ ϣⲁⲉⲛⲉϩ· ⲧ̣ⲟ̣[ⲧⲉ ⲁϥ]‐ <text:line-break/><text:span text:style-name="T1"> </text:span><text:span text:style-name="T2">(130/15) </text:span> ⲛⲟⲩϫⲉ ⲉⲃⲟⲗ ⲙ̅ⲙⲟϥ ⲛ̅ϩⲉ̣[ⲛⲡⲏ]‐ <text:line-break/><text:span text:style-name="T1"> </text:span><text:span text:style-name="T2">(130/16) </text:span> ⲅⲏ ⲛ̅ⲉⲣⲱⲧⲉ· ⲙⲛ̅ϩⲉⲛⲡⲏ̣[ⲅⲏ ⲛ̅]‐ <text:line-break/><text:span text:style-name="T1"> </text:span><text:span text:style-name="T2">(130/17) </text:span> ⲉⲃⲉⲓⲱ ⲙⲛ̅ⲟⲩⲛⲉϩ· ⲙⲛ̅ⲟⲩⲏ̣[ⲣⲡ%6] <text:line-break/><text:span text:style-name="T1"> </text:span><text:span text:style-name="T2">(130/18) </text:span> ⲙⲛ̅ϩⲉⲛⲕⲁⲣⲡⲟⲥ· ⲉⲛⲁⲛⲟ[ⲩⲟⲩ] <text:line-break/><text:span text:style-name="T1"> </text:span><text:span text:style-name="T2">(130/19) </text:span> ⲁⲩⲱ ⲟⲩϯⲡⲉ ⲉⲥϩⲟⲗⲉϭ ⲙⲛ̣̅[ϩⲉⲛ] <text:line-break/><text:span text:style-name="T1"> </text:span><text:span text:style-name="T2">(130/20) </text:span> ⲛⲟⲩⲛⲉ ⲉⲛⲁⲛⲟⲩⲟⲩ· ϫ[ⲉⲕⲁⲁⲥ] <text:line-break/><text:span text:style-name="T1"> </text:span><text:span text:style-name="T2">(130/21) </text:span> ⲛ̅ⲛⲉϥϣⲧⲁ ϫⲛ̅ⲛ̅ϫⲱⲙ̣ [ϣⲁ]‐ <text:line-break/><text:span text:style-name="T1"> </text:span><text:span text:style-name="T2">(130/22) </text:span> ϫⲱⲙ· ⲁⲩⲱ ϫⲛ̅ⲁⲛⲏϩⲉ ϣ̣[ⲁⲁ]‐ <text:line-break/><text:span text:style-name="T1"> </text:span><text:span text:style-name="T2">(130/23) </text:span> ⲛⲏϩⲉ· ⲛ̅ⲧⲟϥ ⲇⲉ ϥⲛ̅ⲧⲡⲉ ⲛ.[.] <text:line-break/><text:span text:style-name="T1"> </text:span><text:span text:style-name="T2">(131/1) </text:span> [ ]ⲉ̣ϥⲁϩⲉ ⲉⲣⲁⲧϥ̅ ⲛ̅ϭⲓ <text:line-break/><text:span text:style-name="T1"> </text:span><text:span text:style-name="T2">(131/2) </text:span> [ ].ⲉⲡⲉϥⲥⲁⲉⲓⲉ ⲛ̅ <text:line-break/><text:span text:style-name="T1"> </text:span><text:span text:style-name="T2">(131/3) </text:span> [.........]....ⲃ· ⲁⲩⲱ ⲛ̅ⲡⲃⲟⲗ <text:line-break/><text:span text:style-name="T1"> </text:span><text:span text:style-name="T2">(131/4) </text:span> [.....]ϭ ⲛ̅ⲟⲩⲟⲉⲓⲛ ⲡⲉ ⲉϥϭⲙ̅ϭⲟⲙ <text:line-break/><text:span text:style-name="T1"> </text:span><text:span text:style-name="T2">(131/5) </text:span> [.....]ⲡⲉϯⲛⲉ ⲙ̅ⲙⲟϥ ϫⲉ ⲛ̅ⲧⲟϥ <text:line-break/><text:span text:style-name="T1"> </text:span><text:span text:style-name="T2">(131/6) </text:span> [...].ⲉⲙⲁϩⲧⲉ ⲉϫⲛ̅ⲛⲁⲓⲱⲛ ⲉⲧⲙ̅‐ <text:line-break/><text:span text:style-name="T1"> </text:span><text:span text:style-name="T2">(131/7) </text:span> [ⲡⲥⲁⲛⲧ]ⲡⲉ ⲁⲩⲱ ⲉⲧⲙ̅ⲡⲉⲥⲏⲧ%6 <text:line-break/><text:span text:style-name="T1"> </text:span><text:span text:style-name="T2">(131/8) </text:span> [.....].ϥⲓ ⲉⲃⲟⲗ ϩⲙ̅ⲡⲉⲕⲣⲱⲙ ⲙ̅ <text:line-break/><text:span text:style-name="T1"> </text:span><text:span text:style-name="T2">(131/9) </text:span> [.....].ⲛ ⲁⲩϫⲟⲟⲣⲉϥ ⲉⲃⲟⲗ ϩⲙ̅ⲡⲉ <text:line-break/><text:span text:style-name="T1"> </text:span><text:span text:style-name="T2">(131/10) </text:span> [....]ⲱⲙⲁ ⲉⲧⲙ̅ⲡⲥⲁⲛⲧⲡⲉ ⲁⲩⲱ <text:line-break/><text:span text:style-name="T1"> </text:span><text:span text:style-name="T2">(131/11) </text:span> [ⲉⲧⲙ̅ⲡⲥ]ⲁⲛⲡⲓⲧⲛ̅ ⲛⲉϩⲃⲏⲟⲩⲉ ⲧⲏ‐ <text:line-break/><text:span text:style-name="T1"> </text:span><text:span text:style-name="T2">(131/12) </text:span> [ⲣⲟⲩ ..]ⲁ̣ϣⲉ ⲛ̅ϩⲏⲧⲟⲩ ⲛ̅ⲧⲟⲟⲩ ⲡⲉ <text:line-break/><text:span text:style-name="T1"> </text:span><text:span text:style-name="T2">(131/13) </text:span> [......] ⲉϫⲛ̅ⲧⲡⲉ ⲉⲧⲙ̅ⲡⲥⲁⲛⲧⲡⲉ <text:line-break/><text:span text:style-name="T1"> </text:span><text:span text:style-name="T2">(131/14) </text:span> [ⲁⲩⲱ ⲉϫ]ⲙ̣̅ⲡⲕⲁϩ ⲉⲧⲙ̅ⲡⲥⲁⲛⲡⲓ <text:line-break/><text:span text:style-name="T1"> </text:span><text:span text:style-name="T2">(131/15) </text:span> [ⲧⲛ̅· ⲛ̅ϩⲣ]ⲁⲓ̣̈ ⲛ̅ϩⲏⲧⲟⲩ ⲉⲩⲁϣⲉ ⲛ̅ϭⲓ <text:line-break/><text:span text:style-name="T1"> </text:span><text:span text:style-name="T2">(131/16) </text:span> [ⲛⲉϩⲃ]ⲏⲟⲩⲉ ⲧⲏⲣⲟⲩ· ⲛ̅ⲧⲉⲣⲉⲓ̈ⲟⲩ <text:line-break/><text:span text:style-name="T1"> </text:span><text:span text:style-name="T2">(131/17) </text:span> [ⲇⲁⲥ ⲇ]ⲉ ⲥⲱⲧⲙ̅ ⲉⲛⲁⲓ̈ ⲁϥⲡⲁϩⲧϥ̅ ⲁϥ <text:line-break/><text:span text:style-name="T1"> </text:span><text:span text:style-name="T2">(131/18) </text:span> [.....]ⲧ%6 ⲁϥϯⲉⲟⲟⲩ ⲙ̅ⲡϫⲟⲉⲓⲥ· <text:line-break/><text:span text:style-name="T1"> </text:span><text:span text:style-name="T2">(131/19) </text:span> [ⲁⲙⲁⲣⲓ]ϩ̣ⲁⲙⲙⲏ ϣⲓⲛⲉ ⲛ̅ⲉ⟦ⲥ⟧ⲥⲛⲏⲩ <text:line-break/><text:span text:style-name="T1"> </text:span><text:span text:style-name="T2">(131/20) </text:span> [.....] ⲉⲧⲉⲧⲛ̅ϣⲓⲛⲉ ⲙ̅ⲡϣⲏⲣⲉ ⲙ̅ <text:line-break/><text:span text:style-name="T1"> </text:span><text:span text:style-name="T2">(131/21) </text:span> [.....] ⲉ̣ⲣⲟⲟⲩ ⲉⲧⲉⲧⲛⲁⲕⲁⲁⲩ ⲧⲱⲛ <text:line-break/><text:span text:style-name="T1"> </text:span><text:span text:style-name="T2">(131/22) </text:span> [ⲡⲉϫⲉ ⲡϫ]ⲟⲉⲓⲥ ⲛⲁⲥ ϫⲉ ⲧⲥⲱⲛⲉ· <text:line-break/><text:span text:style-name="T1"> </text:span><text:span text:style-name="T2">(131/23) </text:span> [......]ⲛⲁϣϣⲓⲛⲉ ⲛ̅ⲥⲁⲛⲁⲓ̈ ⲉⲓ <text:line-break/><text:soft-page-break/><text:span text:style-name="T1"> </text:span><text:span text:style-name="T2">(131/24) </text:span> [....]..ⲉⲩⲛ̅ⲧⲁϥⲧⲟⲡⲟⲥ ⲙ̅ⲙⲁⲩ <text:line-break/><text:span text:style-name="T1"> </text:span><text:span text:style-name="T2">(132/1) </text:span> ⲉⲕⲁⲁⲩ ϩⲙ̅ⲡⲉϥϩⲏ[ⲧ%6 <text:line-break/><text:span text:style-name="T1"> </text:span><text:span text:style-name="T2">(132/2) </text:span> ⲙ̅ⲙⲟϥ ⲉⲉⲓ ⲉⲃⲟ̣[ⲗ <text:line-break/><text:span text:style-name="T1"> </text:span><text:span text:style-name="T2">(132/3) </text:span> ⲛ̅ϥⲃⲱⲕ ⲉϩⲟⲩⲛ̣ .[.]..[.......] <text:line-break/><text:span text:style-name="T1"> </text:span><text:span text:style-name="T2">(132/4) </text:span> ϫⲉⲕⲁⲁⲥ ⲛ̅ⲛⲟⲩⲕⲁⲧⲉⲭⲉ ⲙ̅.[.....] <text:line-break/><text:span text:style-name="T1"> </text:span><text:span text:style-name="T2">(132/5) </text:span> ⲡⲓⲕⲟⲥⲙⲟⲥ ⲛ̅ϩⲏⲕⲉ ⲡⲉϫⲁϥ [ⲛ̅ϭⲓⲙⲁⲑ]‐ <text:line-break/><text:span text:style-name="T1"> </text:span><text:span text:style-name="T2">(132/6) </text:span> ⲑⲁⲓⲟⲥ ϫⲉⲡϫⲟⲉⲓⲥ ϯⲟⲩⲱϣ̣ [ⲉⲛⲁⲩ]‐ <text:line-break/><text:span text:style-name="T1"> </text:span><text:span text:style-name="T2">(132/7) </text:span> ⲉⲡⲙⲁ ⲙ̅ⲡⲱⲛϩ ⲉⲧⲙ̅ⲙⲁⲩ [.....] <text:line-break/><text:span text:style-name="T1"> </text:span><text:span text:style-name="T2">(132/8) </text:span> ⲉⲧⲉⲙⲛ̅ⲕⲁⲕ⟦ⲉ⟧ⲓⲁ ⲙ̅ⲙⲁⲩ ⲁⲗⲗ[ⲁ ⲡⲟⲩⲟ]‐ <text:line-break/><text:span text:style-name="T1"> </text:span><text:span text:style-name="T2">(132/9) </text:span> ⲉⲓⲛ ⲡⲉ ⲉⲧ%6ⲧⲃ̅ⲃⲏⲟⲩ· ⲡⲉϫ̣[ⲁϥ ⲛ̅ϭⲓ] <text:line-break/><text:span text:style-name="T1"> </text:span><text:span text:style-name="T2">(132/10) </text:span> ⲡϫⲟⲉⲓⲥ ϫⲉⲡⲥⲟⲛ ⲙⲁⲑⲑⲁⲓ̣[ⲟⲥ] <text:line-break/><text:span text:style-name="T1"> </text:span><text:span text:style-name="T2">(132/11) </text:span> ⲕⲛⲁϣⲛⲁⲩ ⲁⲛ· ⲉⲣⲟϥ ⲉⲫ ⲟ[ⲥⲟⲛ ⲉⲕ]‐ <text:line-break/><text:span text:style-name="T1"> </text:span><text:span text:style-name="T2">(132/12) </text:span> ⲫⲟⲣⲓ ⲛ̅ⲧⲥⲁⲣⲝ· ⲡⲉϫⲁϥ ⲛ̅ϭ̣[ⲓⲙⲁⲑ]‐ <text:line-break/><text:span text:style-name="T1"> </text:span><text:span text:style-name="T2">(132/13) </text:span> ⲑⲁⲓⲟⲥ ϫⲉⲡϫⲟⲉⲓⲥ ⲕⲁ[......] <text:line-break/><text:span text:style-name="T1"> </text:span><text:span text:style-name="T2">(132/14) </text:span> ⲛⲁⲩ ⲉⲣⲟϥ ⲁⲛ ⲙⲁⲣⲓⲥⲟ[..... ⲡⲉ]‐ <text:line-break/><text:span text:style-name="T1"> </text:span><text:span text:style-name="T2">(132/15) </text:span> ϫⲁϥ ⲛ̅ϭⲓⲡϫⲟⲉⲓⲥ ϫⲉⲟⲩⲟⲛ ⲛ[ⲓⲙ] <text:line-break/><text:span text:style-name="T1"> </text:span><text:span text:style-name="T2">(132/16) </text:span> ⲉⲧⲁϩⲥⲟⲩⲱⲛϥ̅ ⲙ̅ⲙⲓⲛ ⲙ̅ⲙⲟϥ ⲁϥⲛⲁⲩ ⲉⲣⲟ[ϥ ..] <text:line-break/><text:span text:style-name="T1"> </text:span><text:span text:style-name="T2">(132/17) </text:span> ϩⲱⲃ ⲛⲓⲙ ⲉⲧⲥ̅ⲧⲟ ⲛⲁϥ ⲉⲁⲁϥ̣ [...] <text:line-break/><text:span text:style-name="T1"> </text:span><text:span text:style-name="T2">(132/18) </text:span> ⲙ̅ⲙⲟϥ ⲁⲩⲱ ⲁϥϣⲱⲡⲉ ⲉϥ̣[....] <text:line-break/><text:span text:style-name="T1"> </text:span><text:span text:style-name="T2">(132/19) </text:span> ⲙ̅ⲙⲟϥ ϩⲛ̅ⲧⲉϥⲙⲛ̅ⲧⲁⲅⲁⲑ[ⲟⲥ ⲁⲓ̈]‐ <text:line-break/><text:span text:style-name="T1"> </text:span><text:span text:style-name="T2">(132/20) </text:span> ⲟⲩⲇⲁⲥ ⲟⲩⲱϣⲃ̅ ⲉϥϫⲱ ⲙ̣̅[ⲙⲟⲥ] <text:line-break/><text:span text:style-name="T1"> </text:span><text:span text:style-name="T2">(132/21) </text:span> ϫⲉϫⲟⲟⲥ ⲉⲣⲟⲉⲓ ⲡϫⲟⲉⲓⲥ ϫ̣[ⲉ...] <text:line-break/><text:span text:style-name="T1"> </text:span><text:span text:style-name="T2">(132/22) </text:span> ⲧⲟ ⲉⲧⲕⲓⲙ ⲉⲡⲕⲁϩ ⲛ̅ⲁϣ ⲛ̣̅[ϩⲉ ⲉ.] <text:line-break/><text:span text:style-name="T1"> </text:span><text:span text:style-name="T2">(132/23) </text:span> ⲕⲓⲙ· ⲁⲡϫⲟⲉⲓⲥ ϫⲓ ⲛ̅ⲟⲩⲱ[ⲛⲉ ⲁϥ]‐ <text:line-break/><text:span text:style-name="T1"> </text:span><text:span text:style-name="T2">(132/24) </text:span> ⲉⲙⲁϩⲧⲉ ⲙ̅ⲙⲟϥ ϩⲛ̅ⲧⲉϥϭⲓϫ [..] <text:line-break/><text:span text:style-name="T1"> </text:span><text:span text:style-name="T2">(133/1) </text:span> [..... ϫⲉⲟⲩ] ⲡ̣ⲉ ⲡⲁⲓ̈ ⲉϯⲁⲙⲁϩⲧⲉ ⲙ̅‐ <text:line-break/><text:span text:style-name="T1"> </text:span><text:span text:style-name="T2">(133/2) </text:span> [ⲙⲟϥ] ϩ̣ⲛ̣̅ⲧⲁϭ̣[ⲓ]ϫ̣ ⲡⲉϫⲁϥ ϫⲉⲟⲩⲱⲛⲉ <text:line-break/><text:span text:style-name="T1"> </text:span><text:span text:style-name="T2">(133/3) </text:span> [ⲡⲉ· ⲡ]ⲉϫⲁϥ ⲛⲁⲩ ϫⲉⲡⲉⲧϥⲓ ⲉϩⲣⲁⲓ̈ ϩⲁ <text:line-break/><text:span text:style-name="T1"> </text:span><text:span text:style-name="T2">(133/4) </text:span> [ⲡⲕⲁ]ϩ̣· ⲛ̅ⲧⲟϥ ⲡⲉⲧϥⲓ ⲉϩⲣⲁⲓ̈ ϩⲁⲧⲡⲉ <text:line-break/><text:span text:style-name="T1"> </text:span><text:span text:style-name="T2">(133/5) </text:span> ϩⲟ̣ⲧ̣ⲁⲛ ⲉϥϣⲁⲛⲉⲓ ⲉⲃⲟⲗ ⲛ̅ϭⲓⲟⲩⲗⲟⲅⲟⲥ <text:line-break/><text:span text:style-name="T1"> </text:span><text:span text:style-name="T2">(133/6) </text:span> ⲉⲃⲟⲗ ϩⲛ̅ⲧⲙⲛ̅ⲧⲛⲟϭ ϥⲛⲁϣⲉ ⲉϫⲙ̅ⲡⲁⲓ̈ <text:line-break/><text:span text:style-name="T1"> </text:span><text:span text:style-name="T2">(133/7) </text:span> ⲉⲧϥⲓ ⲉϩⲣⲁⲓ̈ ϩⲁⲧⲡⲉ ⲙⲛ̅ⲡⲕⲁϩ· ⲡⲕⲁϩ <text:line-break/><text:span text:style-name="T1"> </text:span><text:span text:style-name="T2">(133/8) </text:span> ⲅⲁⲣ ⲛ̅ϥⲕⲓⲙ ⲁⲛ ⲉⲛⲉϥⲕⲓⲙ· ⲛⲉϥⲛⲁ <text:line-break/><text:span text:style-name="T1"> </text:span><text:span text:style-name="T2">(133/9) </text:span> ϩⲉ ⲡⲉ ⲁⲗⲗⲁ ϫⲉⲕⲁⲁⲥ ⲛ̅ⲛⲉⲡϣⲁϫⲉ ⲛ̅‐ <text:line-break/><text:span text:style-name="T1"> </text:span><text:span text:style-name="T2">(133/10) </text:span> ϩⲟⲩⲉⲓⲧ%6 ⲟⲩⲱⲥϥ ϫⲉ ⲛ̅ⲧⲟϥ ⲉⲣⲧⲁϩⲉ <text:line-break/><text:span text:style-name="T1"> </text:span><text:span text:style-name="T2">(133/11) </text:span> ⲡⲕⲟⲥⲙⲟⲥ ⲉⲣⲁⲧϥ̅ ⲁⲩⲱ ⲁϥϣⲱⲡⲉ <text:line-break/><text:span text:style-name="T1"> </text:span><text:span text:style-name="T2">(133/12) </text:span> ⲛ̅ϩⲏⲧϥ̅ ⲁ̣ⲩⲱ ⲁϥϫⲓⲥⲧⲟⲉⲓ ⲉⲃⲟⲗ ⲛ̅ϩⲏ‐ <text:line-break/><text:span text:style-name="T1"> </text:span><text:span text:style-name="T2">(133/13) </text:span> [ⲧ]ϥ̅· ⲛ̅[.].ⲛⲓⲙ ⲅⲁⲣ ⲉⲧⲕⲓⲙ ⲁⲛ ⲁⲛⲟⲕ ϯ <text:line-break/><text:span text:style-name="T1"> </text:span><text:span text:style-name="T2">(133/14) </text:span> [......]ⲟⲩ ⲛⲏⲧⲛ̅ ⲛ̅ϣⲏⲣⲉ ⲧⲏⲣⲟⲩ ⲛ̅ⲛ̅ⲣⲱ‐ <text:line-break/><text:span text:style-name="T1"> </text:span><text:span text:style-name="T2">(133/15) </text:span> [ⲙⲉ ϫ]ⲉⲛ̅ⲧⲱⲧⲛ̅ϩⲉⲛⲉⲃⲟⲗ ϩⲙ̅ⲡⲙⲁ <text:line-break/><text:span text:style-name="T1"> </text:span><text:span text:style-name="T2">(133/16) </text:span> [ⲉⲧⲙ̅]ⲙⲁⲩ ⲛⲉⲧϣⲁϫⲉ ⲉⲃⲟⲗ ϩⲙ̅ⲡⲣⲁ‐ <text:line-break/><text:span text:style-name="T1"> </text:span><text:span text:style-name="T2">(133/17) </text:span> [ϣ]ⲉ ⲙⲛ̅ⲧⲙⲏⲉ ⲉⲧⲉⲧⲛ̅ϣⲟⲟⲡ ⲛ̅ϩⲣⲁⲓ̈ <text:line-break/><text:span text:style-name="T1"> </text:span><text:span text:style-name="T2">(133/18) </text:span> [ϩ]ⲙ̣̅ⲡⲟⲩϩⲏⲧ%6 ⲕⲁⲛ ⲉϥϣⲁⲛⲉⲓ ⲉⲃⲟⲗ ϩⲙ̅ <text:line-break/><text:span text:style-name="T1"> </text:span><text:span text:style-name="T2">(133/19) </text:span> [ⲡⲥ]ⲱⲙⲁ ⲙ̅ⲡⲓⲱⲧ ϩⲓⲧⲛ̅ⲛ̅ⲣⲱⲙⲉ <text:line-break/><text:span text:style-name="T1"> </text:span><text:span text:style-name="T2">(133/20) </text:span> [ⲁⲩ]ⲱ ⲛ̅ⲥⲉⲧⲙ̅ϫⲓⲧϥ̅ ⲉⲣⲟⲟⲩ ⲡⲁⲗⲓⲛ <text:line-break/><text:span text:style-name="T1"> </text:span><text:span text:style-name="T2">(133/21) </text:span> [..]ϥⲕⲟⲧϥ̅ ⲉϩⲣⲁⲓ̈ ⲉⲡⲉϥⲙⲁ ⲡⲉⲧⲥⲟⲟⲩⲛ <text:line-break/><text:span text:style-name="T1"> </text:span><text:span text:style-name="T2">(133/22) </text:span> [..].[..]ⲱⲃ ⲛ̅ⲧⲙⲛ̅ⲧ̓ⲧⲉⲗⲓⲟⲥ ⲛ̅ϥⲥⲟ‐ <text:line-break/><text:soft-page-break/><text:span text:style-name="T1"> </text:span><text:span text:style-name="T2">(133/23) </text:span> [ⲟⲩⲛ ⲁⲛ] ⲛ̣̅ⲗⲁⲁⲩ ⲉⲣϣⲁⲧⲙ̅ⲟⲩⲁ ⲱϩⲉ <text:line-break/><text:span text:style-name="T1"> </text:span><text:span text:style-name="T2">(133/24) </text:span> [ⲉⲣⲁ]ⲧ̣ϥ̣̅ ϩⲙ̣̅ⲡⲕⲁⲕⲉ ⲛ̅ϥⲛⲁϣⲛⲁⲩ ⲉⲡⲟⲩ‐ <text:line-break/><text:span text:style-name="T1"> </text:span><text:span text:style-name="T2">(134/1) </text:span> ⲟⲉⲓⲛ ⲁⲛ ⲉⲣⲧⲙ̅ⲧⲉⲟⲩ[ⲁ ⲉⲓⲙⲉ ϫⲉ ⲛ̅]‐ <text:line-break/><text:span text:style-name="T1"> </text:span><text:span text:style-name="T2">(134/2) </text:span> ⲧⲁⲡⲕⲱϩⲧ%6 ϣⲱⲡⲉ ⲛ̣̅[ⲁ]ϣ ⲛ̣̅ϩ[ⲉ] <text:line-break/><text:span text:style-name="T1"> </text:span><text:span text:style-name="T2">(134/3) </text:span> ϥⲛⲁⲣⲱⲕϩ ⲛ̅ϩⲣⲁⲓ̈ ⲛ̅ϩⲏⲧϥ̅· ⲉⲃ̣[ⲟⲗ] <text:line-break/><text:span text:style-name="T1"> </text:span><text:span text:style-name="T2">(134/4) </text:span> ϫⲉ ⲛ̅ϥⲥⲟⲟⲩⲛ ⲁⲛ ⲛ̅ⲧⲉϥⲛⲟⲩⲛⲉ̣ <text:line-break/><text:span text:style-name="T1"> </text:span><text:span text:style-name="T2">(134/5) </text:span> ⲉⲣⲧⲙ̅ⲧⲉⲟⲩⲁ ⲉⲓⲙⲉ ⲛ̅ϣⲟⲣⲡ%6 ⲉⲡⲓ̣ <text:line-break/><text:span text:style-name="T1"> </text:span><text:span text:style-name="T2">(134/6) </text:span> ⲙⲟⲟⲩ ϥⲥⲟⲟⲩⲛ ⲁⲛ ⲛ̅ⲗⲁⲁⲩ ⲟⲩ ⲅⲁⲣ <text:line-break/><text:span text:style-name="T1"> </text:span><text:span text:style-name="T2">(134/7) </text:span> ⲧⲉ ⲧⲉⲭⲣⲓⲁ ⲉⲧⲣⲉϥϫⲓⲃⲁⲡⲧⲓⲥⲙⲁ <text:line-break/><text:span text:style-name="T1"> </text:span><text:span text:style-name="T2">(134/8) </text:span> ⲛ̅ϩⲣⲁⲓ̈ ⲛ̅ϩⲏⲧϥ̅· ⲉⲣⲧⲙ̅ⲧⲉⲟⲩⲁ ⲉⲓ‐ <text:line-break/><text:span text:style-name="T1"> </text:span><text:span text:style-name="T2">(134/9) </text:span> ⲙⲉ ⲉⲡⲧⲏⲟⲩ ⲉⲧⲛⲓϥⲉ ϫⲉⲛ̅ⲧⲁϥ‐ <text:line-break/><text:span text:style-name="T1"> </text:span><text:span text:style-name="T2">(134/10) </text:span> ϣⲱⲡⲉ ⲛ̅ⲁϣ ⲛ̅ϩⲉ ϥⲛⲁⲡⲱⲧ%6 <text:line-break/><text:span text:style-name="T1"> </text:span><text:span text:style-name="T2">(134/11) </text:span> ⲛⲙ̅ⲙⲁϥ· ⲉⲣⲧⲙ̅ⲧⲉⲟⲩⲁ ⲉⲓⲙⲉ ⲉ‐ <text:line-break/><text:span text:style-name="T1"> </text:span><text:span text:style-name="T2">(134/12) </text:span> ⲡⲥⲱⲙⲁ ⲉⲧⲉϥⲣ̅ⲫⲟⲣⲉⲓ ⲙ̅ⲙⲟϥ <text:line-break/><text:span text:style-name="T1"> </text:span><text:span text:style-name="T2">(134/13) </text:span> ϫⲉⲡⲱⲥ ⲁϥϣⲱⲡⲉ ϥⲛⲁⲧ̣[ⲁ]ⲕ̣ⲟ̣ ⲛⲙ̅‐ <text:line-break/><text:span text:style-name="T1"> </text:span><text:span text:style-name="T2">(134/14) </text:span> ⲙⲁϥ· ⲁⲩⲱ ⲡⲉⲧⲥⲟⲟⲩⲛ ⲁ[ⲛ ....] <text:line-break/><text:span text:style-name="T1"> </text:span><text:span text:style-name="T2">(134/15) </text:span> ⲣⲉ ⲛ̅ⲁϣ ⲛ̅ϩⲉ ϥⲛⲁⲥⲟⲩⲱⲛⲡ.[..] <text:line-break/><text:span text:style-name="T1"> </text:span><text:span text:style-name="T2">(134/16) </text:span> ⲁⲩⲱ ⲡⲉⲧⲉⲛⲉϥⲥⲟⲩⲛ̅ⲧⲛⲟⲩⲛ̣[ⲉ] <text:line-break/><text:span text:style-name="T1"> </text:span><text:span text:style-name="T2">(134/17) </text:span> ⲛ̅ϩⲱⲃ ⲛⲓⲙ· ⲥⲉϩⲏⲡ%6 ⲉⲣⲟϥ ⲡⲉⲧⲉ̣ <text:line-break/><text:span text:style-name="T1"> </text:span><text:span text:style-name="T2">(134/18) </text:span> ⲛ̅ⲛⲉϥⲥⲟⲩⲛ̅ⲧⲛⲟⲩⲛⲉ ⲛ̅ⲧⲕⲁⲕⲓⲁ <text:line-break/><text:span text:style-name="T1"> </text:span><text:span text:style-name="T2">(134/19) </text:span> ⲛ̅ⲟⲩϣⲙ̅ⲙⲟ ⲉⲣⲟⲥ ⲁⲛ ⲡⲉ· ⲡⲉ‐ <text:line-break/><text:span text:style-name="T1"> </text:span><text:span text:style-name="T2">(134/20) </text:span> ⲧⲉⲛ̅ϥⲛⲁⲉⲓⲙⲉ ⲁⲛ ϫⲉ ⲛ̅ⲁϣ ⲛ̅ϩⲉ̣ <text:line-break/><text:span text:style-name="T1"> </text:span><text:span text:style-name="T2">(134/21) </text:span> ⲁϥⲉⲓ ⲛ̅ϥⲛⲁⲉⲓⲙⲉ ⲁⲛ ϫⲉ ⲛ̅ⲁϣ ⲛ̣̅‐ <text:line-break/><text:span text:style-name="T1"> </text:span><text:span text:style-name="T2">(134/22) </text:span> ϩⲉ ⲉϥⲛⲁⲃⲱⲕ ⲁⲩⲱ ⲟⲩϣⲙ̣̅ⲙ̣ⲟ̣ <text:line-break/><text:span text:style-name="T1"> </text:span><text:span text:style-name="T2">(134/23) </text:span> ⲁⲛ ⲡⲉ ⲉⲡⲓⲕⲟⲥⲙⲟⲥ ⲉⲧⲛ[....] <text:line-break/><text:span text:style-name="T1"> </text:span><text:span text:style-name="T2">(134/24) </text:span> ⲉⲧⲟⲩⲛⲁⲑⲃ̅ⲃⲓⲟϥ· ⲧⲟⲧⲉ ⲁϥ.[.]ⲓ̣̈ⲟ̣[ⲩ] <text:line-break/><text:span text:style-name="T1"> </text:span><text:span text:style-name="T2">(134/25) </text:span> ⲇⲁⲥ ⲙⲛ̅ⲙⲁⲑⲑⲁⲓⲟⲥ ⲙⲛ̅ⲙⲁⲣⲓϩ[ⲁⲙ] <text:line-break/><text:span text:style-name="T1"> </text:span><text:span text:style-name="T2">(135/1) </text:span> [....].[....].ⲏ ⲙ̅ⲡϫⲱⲕ ⲛ̅ⲧⲡⲉ‐ <text:line-break/><text:span text:style-name="T1"> </text:span><text:span text:style-name="T2">(135/2) </text:span> [ⲙⲛ̅]ⲡ̣ⲕⲁϩ̣ [ⲁⲩ]ⲱ ⲛ̅ⲧⲉⲣⲉϥⲕⲁⲧⲉϥ <text:line-break/><text:span text:style-name="T1"> </text:span><text:span text:style-name="T2">(135/3) </text:span> [...] ⲉϫⲱⲟⲩ ⲁⲩϩⲉⲗⲡⲓⲍⲉ ϫⲉⲉⲩⲉ <text:line-break/><text:span text:style-name="T1"> </text:span><text:span text:style-name="T2">(135/4) </text:span> [..]. ⲉⲣⲟϥ ⲁⲓ̈ⲟⲩⲇⲁⲥ ϥⲓⲛⲉϥⲃⲁⲗ ⲉϩⲣⲁⲓ̈ <text:line-break/><text:span text:style-name="T1"> </text:span><text:span text:style-name="T2">(135/5) </text:span> ⲁϥⲛⲁⲩ ⲉⲩⲧⲟⲡⲟⲥ ⲉϥϫⲟⲥⲉ ⲉⲙⲁⲧⲉ <text:line-break/><text:span text:style-name="T1"> </text:span><text:span text:style-name="T2">(135/6) </text:span> ⲁⲩⲱ ⲁϥⲛⲁⲩ ⲉⲡⲧⲟⲡⲟⲥ ⲙ̅ⲡϣⲓⲕ· <text:line-break/><text:span text:style-name="T1"> </text:span><text:span text:style-name="T2">(135/7) </text:span> ⲉⲧⲙ̅ⲡⲥⲁⲛⲡⲓⲧⲛ̅ ⲡⲉϫⲉ ⲓ̈ⲟⲩⲇⲁⲥ ⲙ̅‐ <text:line-break/><text:span text:style-name="T1"> </text:span><text:span text:style-name="T2">(135/8) </text:span> ⲙⲁⲑⲑⲁⲓⲟⲥ ϫⲉ ⲡⲥⲟⲛ ⲛⲓⲙ ⲡⲉ ⲉⲧⲛⲁ‐ <text:line-break/><text:span text:style-name="T1"> </text:span><text:span text:style-name="T2">(135/9) </text:span> ϣⲃⲱⲕ ⲉϩⲣⲁⲓ̈ ⲉⲡⲉⲉⲓϫⲓⲥⲉ ⲏ͂ ⲉⲡⲥⲁ <text:line-break/><text:span text:style-name="T1"> </text:span><text:span text:style-name="T2">(135/10) </text:span> ⲛ̅ⲡⲓⲧⲛ̅ ⲙ̅ⲡϣⲓⲕ ϫⲉⲟⲩⲛⲟⲩⲛⲟϭ <text:line-break/><text:span text:style-name="T1"> </text:span><text:span text:style-name="T2">(135/11) </text:span> ⲛ̅ⲕⲱϩⲧ%6 ⲙ̅ⲙⲁⲩ ⲙⲛ̅ⲟⲩⲛⲟϭ ⲛ̅ϩⲟⲧⲉ <text:line-break/><text:span text:style-name="T1"> </text:span><text:span text:style-name="T2">(135/12) </text:span> ⲛ̅ⲧⲉⲩⲛⲟⲩ ⲉⲧⲙ̅ⲙⲁⲩ ⲁϥⲉⲓ ⲉⲃⲟⲗ ⲙ̅‐ <text:line-break/><text:span text:style-name="T1"> </text:span><text:span text:style-name="T2">(135/13) </text:span> ⲙ̣ⲟ̣ϥ̣ ⲛ̣̅ϭⲓⲟⲩⲗⲟⲅⲟⲥ ϩⲱⲥ ⲉϥⲁϩⲉ ⲉ‐ <text:line-break/><text:span text:style-name="T1"> </text:span><text:span text:style-name="T2">(135/14) </text:span> [ⲣⲁⲧ]ϥ̣̅ ⲁϥⲛⲁⲩ ⲉⲣⲟϥ ⲛ̅ⲑⲉ ⲛ̅ⲧⲁϥⲉⲓ ⲉ‐ <text:line-break/><text:span text:style-name="T1"> </text:span><text:span text:style-name="T2">(135/15) </text:span> [ⲡⲓⲧ]ⲛ̅· ⲧⲟⲧⲉ ⲡⲉϫⲁϥ ⲛⲁϥ ϫⲉⲉⲧⲃⲉ <text:line-break/><text:span text:style-name="T1"> </text:span><text:span text:style-name="T2">(135/16) </text:span> [ⲟⲩ] ⲁⲕⲉⲓ ⲉⲡⲓⲧⲛ̅· ⲁⲩⲱ ⲁⲡϣⲏⲣⲉ <text:line-break/><text:span text:style-name="T1"> </text:span><text:span text:style-name="T2">(135/17) </text:span> ⲙ̣̅ⲡⲣⲱⲙⲉ ϣⲛ̅ⲧⲟⲩ ⲡⲉϫⲁϥ ⲛⲁⲩ <text:line-break/><text:span text:style-name="T1"> </text:span><text:span text:style-name="T2">(135/18) </text:span> ϫ̣ⲉⲟⲩⲃⲗ̅ⲃⲓⲗⲉ ⲉⲃⲟⲗ ϩⲛ̅ⲟⲩϭⲟⲙ ⲁⲥ‐ <text:line-break/><text:span text:style-name="T1"> </text:span><text:span text:style-name="T2">(135/19) </text:span> ϣ̣ⲧⲁ ⲁⲩⲱ ⲁⲥⲃⲱⲕ ⲉⲡⲥⲁⲛ̅ⲡⲓⲧⲛ̅ ⲉ‐ <text:line-break/><text:span text:style-name="T1"> </text:span><text:span text:style-name="T2">(135/20) </text:span> [ⲡ]ϣⲓⲕ ⲙ̅ⲡⲕⲁϩ ⲁⲩⲱ ⲁⲧⲙⲛ̅ⲧⲛⲟϭ <text:line-break/><text:soft-page-break/><text:span text:style-name="T1"> </text:span><text:span text:style-name="T2">(135/21) </text:span> [ⲣ̅ⲡⲉⲥ]ⲙ̣ⲉⲉⲩⲉ ⲁϥⲧⲛ̅ⲛⲟⲟⲩ ⲙ̅ⲡⲗⲟ‐ <text:line-break/><text:span text:style-name="T1"> </text:span><text:span text:style-name="T2">(135/22) </text:span> [ⲅⲟⲥ ϣⲁ]ⲣⲟⲥ ⲁϥⲉⲓⲛⲉ ⲙ̅ⲙⲟⲥ ⲉϩⲣⲁⲓ̈ ⲙ̅‐ <text:line-break/><text:span text:style-name="T1"> </text:span><text:span text:style-name="T2">(135/23) </text:span> [ⲡⲉ]ϥ̣ⲙ̣̅[ⲧⲟ] ⲉⲃⲟⲗ ϫⲉⲛⲉϥⲟⲩⲱⲥϥ ⲛ̅ϭⲓ <text:line-break/><text:span text:style-name="T1"> </text:span><text:span text:style-name="T2">(136/1) </text:span> ⲡϣⲟⲣⲡ%6 ⲛ̅ϣⲁϫⲉ ⲧ̣[ⲟⲧⲉ ⲁ]ⲛ̣ⲉ̣[ϥⲙⲁ]‐ <text:line-break/><text:span text:style-name="T1"> </text:span><text:span text:style-name="T2">(136/2) </text:span> ⲑⲏⲧⲏⲥ ⲣ̅ϣⲡⲏⲣⲉ ⲛ̅[ϩⲱ]ⲃ̣ ⲛⲓⲙ̣ [ⲛ̅]‐ <text:line-break/><text:span text:style-name="T1"> </text:span><text:span text:style-name="T2">(136/3) </text:span> ⲧⲁϥϫⲟⲟⲩ ⲛⲁⲩ ⲁⲩϫⲓⲧⲟⲩ ϩⲛ̅ⲟⲩ̣[ⲛⲁ] <text:line-break/><text:span text:style-name="T1"> </text:span><text:span text:style-name="T2">(136/4) </text:span> ϩⲧⲉ ⲁⲩⲱ ⲁⲩⲉⲓⲙⲉ ϫⲉ ⲛ̅ⲥⲣ̅ⲭⲣⲓⲁ ϭ̣ⲉ̣ <text:line-break/><text:span text:style-name="T1"> </text:span><text:span text:style-name="T2">(136/5) </text:span> ⲁⲛ ⲛ̅ⲛⲁⲩ ⲉⲧⲕⲁⲕⲓⲁ ⲧⲟⲧⲉ ⲡⲉϫⲁϥ ⲛ̣̅‐ <text:line-break/><text:span text:style-name="T1"> </text:span><text:span text:style-name="T2">(136/6) </text:span> ⲛⲉϥⲙⲁⲑⲏⲧⲏⲥ ϫⲉⲙⲏ ⲙ̅ⲡⲓϫⲟⲟⲥ <text:line-break/><text:span text:style-name="T1"> </text:span><text:span text:style-name="T2">(136/7) </text:span> ⲛⲏⲧⲛ̅ ϫⲉ ⲛ̅ⲑⲉ ⲛ̅ⲟⲩⲥⲙⲏ ⲙⲛ̅ⲟⲩⲉ <text:line-break/><text:span text:style-name="T1"> </text:span><text:span text:style-name="T2">(136/8) </text:span> ⲃⲣⲏϭⲉ ⲉϣⲁⲩⲛⲁⲩ ⲉⲣⲟⲟⲩ ⲧⲁⲓ̈ ⲧⲉ <text:line-break/><text:span text:style-name="T1"> </text:span><text:span text:style-name="T2">(136/9) </text:span> ⲑⲉ ⲉⲩⲛⲁϫⲓ ⲛ̅ⲛ̅ⲁⲅⲁⲑⲟⲥ ⲉϩⲣⲁⲓ̈ ⲉ‐ <text:line-break/><text:span text:style-name="T1"> </text:span><text:span text:style-name="T2">(136/10) </text:span> ⲡⲟⲩⲟⲉⲓⲛ ⲧⲟⲧⲉ ⲁⲛⲉϥⲙⲁⲑⲏⲧⲏⲥ <text:line-break/><text:span text:style-name="T1"> </text:span><text:span text:style-name="T2">(136/11) </text:span> ⲧⲏⲣⲟⲩ ϯⲉⲟⲟⲩ ⲛⲁϥ ⲡⲉϫⲁⲩ ϫⲉⲡϫⲟ <text:line-break/><text:span text:style-name="T1"> </text:span><text:span text:style-name="T2">(136/12) </text:span> ⲉⲓⲥ ϩⲁⲧⲉϩⲏ ⲉⲙⲡⲁⲧⲉⲕⲟⲩⲱⲛϩ ⲉⲃⲟⲗ <text:line-break/><text:span text:style-name="T1"> </text:span><text:span text:style-name="T2">(136/13) </text:span> ⲙ̅ⲡⲓⲙⲁ ⲛⲉⲛⲓⲙ ⲡⲉ ⲉⲧϯⲉⲟⲟⲩ ⲛⲁⲕ <text:line-break/><text:span text:style-name="T1"> </text:span><text:span text:style-name="T2">(136/14) </text:span> ϫⲉⲉⲣⲉⲛⲉⲟⲟⲩ ⲧⲏⲣⲟⲩ ϣⲟ̣ⲟⲡ [ⲉⲃⲟⲗ] <text:line-break/><text:span text:style-name="T1"> </text:span><text:span text:style-name="T2">(136/15) </text:span> ϩⲓⲧⲟⲟⲧⲕ ⲏ͂ ⲛⲓⲙ ⲡⲉ ⲉⲧⲛⲁⲥⲙⲟⲩ [ⲉⲣⲟⲕ] <text:line-break/><text:span text:style-name="T1"> </text:span><text:span text:style-name="T2">(136/16) </text:span> ϫⲉⲉⲣⲉⲡⲉⲥⲙⲟⲩ ⲧⲏⲣϥ ⲛⲏⲟⲩ ⲉⲃⲟ̣[ⲗ ⲙ̅]‐ <text:line-break/><text:span text:style-name="T1"> </text:span><text:span text:style-name="T2">(136/17) </text:span> ⲙⲟⲕ· ϩⲱⲥ ⲉⲩⲁϩⲉ ⲉⲣⲁⲧⲟⲩ ⲁϥⲛⲁⲩ <text:line-break/><text:span text:style-name="T1"> </text:span><text:span text:style-name="T2">(136/18) </text:span> ⲉⲡ̅ⲛ̅ⲁ̅ ⲥⲛⲁⲩ ⲉⲩϥⲓ ⲛ̅ⲟⲩⲯⲩⲭⲏ ⲛ̅ⲟⲩ <text:line-break/><text:span text:style-name="T1"> </text:span><text:span text:style-name="T2">(136/19) </text:span> ⲱⲧ%6 ⲛⲙ̅ⲙⲁⲩ ϩⲛ̅ⲟⲩⲛⲟϭ ⲛ̅ⲉⲃⲣⲏϭⲉ̣ <text:line-break/><text:span text:style-name="T1"> </text:span><text:span text:style-name="T2">(136/20) </text:span> ⲁⲩⲱ ⲟⲩϣⲁϫⲉ ⲁϥⲉⲓ ⲉⲃⲟⲗ ϩⲓⲧⲟⲟⲧϥ̣̅ <text:line-break/><text:span text:style-name="T1"> </text:span><text:span text:style-name="T2">(136/21) </text:span> ⲙ̅ⲡϣⲏⲣⲉ ⲙ̅ⲡⲣⲱⲙⲉ ⲉϥϫⲱ ⲙ̣̅‐ <text:line-break/><text:span text:style-name="T1"> </text:span><text:span text:style-name="T2">(136/22) </text:span> ⲙⲟⲥ ϫⲉⲙⲁϯ ⲛⲁⲩ ⲛ̅ⲧⲉⲩϩⲃ̅ⲥⲱ̣ [ⲁⲩⲱ] <text:line-break/><text:span text:style-name="T1"> </text:span><text:span text:style-name="T2">(136/23) </text:span> ⲁⲡⲕⲟⲩⲉⲓ ⲣ̅ⲑⲉ ⲙ̅ⲡⲛⲟϭ ⲛⲉⲩ[.]..[.] <text:line-break/><text:span text:style-name="T1"> </text:span><text:span text:style-name="T2">(136/24) </text:span> ⲛ̅ⲛⲉⲛⲧⲁⲩⲡⲁⲣⲁⲗⲁⲙⲃⲁⲛⲉ ⲙ̅ⲙ̣[ⲟ] <text:line-break/><text:span text:style-name="T1"> </text:span><text:span text:style-name="T2">(137/1) </text:span> ⲟⲩ· ⲛⲉ.[ ]ⲛⲉⲩⲉⲣⲏⲟⲩ <text:line-break/><text:span text:style-name="T1"> </text:span><text:span text:style-name="T2">(137/2) </text:span> ⲧⲟⲧⲉ ⲁⲛϣ[ ]ⲙⲁⲑⲏⲧⲏⲥ <text:line-break/><text:span text:style-name="T1"> </text:span><text:span text:style-name="T2">(137/3) </text:span> ⲛⲁⲓ̈ ⲛ̅ⲧⲁϥϫ[ ⲡⲉϫⲁⲥ ] ⲛ̅ϭⲓⲙⲁ <text:line-break/><text:span text:style-name="T1"> </text:span><text:span text:style-name="T2">(137/4) </text:span> ⲣⲓϩⲁⲙⲙⲏ [ϫⲉ ]ⲛ̣ⲁⲩ ⲉⲡ%6‐ <text:line-break/><text:span text:style-name="T1"> </text:span><text:span text:style-name="T2">(137/5) </text:span> ⲡⲟⲛⲏⲣⲟ[ ] ⲉⲣⲟ⟦ϥ⟧ⲟⲩ ϫⲛ̅ⲛ̅‐ <text:line-break/><text:span text:style-name="T1"> </text:span><text:span text:style-name="T2">(137/6) </text:span> ϣⲟⲣⲡ%6 [ ]ⲉ̣ⲣⲏⲟⲩ· ⲡⲉ <text:line-break/><text:span text:style-name="T1"> </text:span><text:span text:style-name="T2">(137/7) </text:span> ϫⲉⲡϫⲟⲉ̣[ⲓⲥ .......]. ⲛ̅ⲧⲁⲣⲉⲛⲁⲩ <text:line-break/><text:span text:style-name="T1"> </text:span><text:span text:style-name="T2">(137/8) </text:span> ⲉⲣⲟⲟⲩ ⲁ[........]ϣⲱⲡⲉ ⲛ̅ⲛⲟϭ ⲥⲉ‐ <text:line-break/><text:span text:style-name="T1"> </text:span><text:span text:style-name="T2">(137/9) </text:span> ⲛⲁⲙⲟⲩ[....].ⲁ. ϩⲟⲧⲁⲛ ⲇⲉ ⲉⲣϣⲁⲛ‐ <text:line-break/><text:span text:style-name="T1"> </text:span><text:span text:style-name="T2">(137/10) </text:span> ⲛⲁⲩ ⲉⲡⲉⲧϣⲟⲟⲡ%6 ϣⲁⲉⲛⲉϩ ⲧⲉⲧⲙ̅ⲙⲁⲩ <text:line-break/><text:span text:style-name="T1"> </text:span><text:span text:style-name="T2">(137/11) </text:span> ⲧⲉ ⲧⲛⲟϭ ⲛ̅ϩⲟⲣⲁⲥⲓⲥ· ⲧⲟⲧⲉ ⲡⲉϫⲁⲩ ⲛⲁϥ <text:line-break/><text:span text:style-name="T1"> </text:span><text:span text:style-name="T2">(137/12) </text:span> ⲧⲏⲣⲟⲩ ϫⲉⲙⲁⲧⲁⲙⲟⲛ ⲉⲣⲟⲥ ⲡⲉϫⲁϥ ⲛⲁⲩ <text:line-break/><text:span text:style-name="T1"> </text:span><text:span text:style-name="T2">(137/13) </text:span> ϫ̣ⲉϩⲛ̅ⲟⲩ ⲉⲧⲉⲧⲛ̅ⲟⲩⲱϣⲛⲁⲩ ⲉⲣⲟⲥ <text:line-break/><text:span text:style-name="T1"> </text:span><text:span text:style-name="T2">(137/14) </text:span> [ϩⲛ̅ⲟ]ⲩϩⲟⲣⲁⲥⲓⲥ ⲉⲥⲛⲁⲟⲩⲱⲥϥ ϫⲛ̅ⲟⲩϩⲟ <text:line-break/><text:span text:style-name="T1"> </text:span><text:span text:style-name="T2">(137/15) </text:span> [ⲣⲁⲥ]ⲓ̣ⲥ ⲛ̅ϣⲁⲉⲛⲉϩ· ⲡⲁⲗⲓⲛ ⲡⲉϫⲁϥ ϫⲉ <text:line-break/><text:span text:style-name="T1"> </text:span><text:span text:style-name="T2">(137/16) </text:span> [ⲁⲣⲓⲁ]ⲅ̣ⲱⲛⲓⲍⲉ ⲛ̅ⲧⲉⲧⲛ̅ⲛⲟⲩϩⲙ̅ ⲙ̅ⲡⲁⲓ̈ <text:line-break/><text:span text:style-name="T1"> </text:span><text:span text:style-name="T2">(137/17) </text:span> [ⲉⲧⲉ]ⲟⲩⲛϭⲟⲙ ⲙ̅ⲙⲟϥ ⲉⲟⲩⲁϩϥ ⲛ̅ⲥⲱ <text:line-break/><text:span text:style-name="T1"> </text:span><text:span text:style-name="T2">(137/18) </text:span> [..] ⲁⲩⲱ ⲛ̅ⲧⲉⲧⲛ̅ϣⲓⲛⲉ ⲛ̅ⲥⲱϥ ⲛ̅ⲧⲉ <text:line-break/><text:span text:style-name="T1"> </text:span><text:span text:style-name="T2">(137/19) </text:span> [ⲧⲛ̅]ϣⲁϫⲉ ⲛ̅ϩⲣⲁⲓ̈ ⲛ̅ϩⲏⲧϥ̅· ϫⲉⲕⲁⲁⲥ <text:line-break/><text:span text:style-name="T1"> </text:span><text:span text:style-name="T2">(137/20) </text:span> [ⲛ̅ⲕ]ⲁ̣ ⲛⲓⲙ ⲉⲧⲉⲧⲛ̅ϣⲓⲛⲉ ⲛ̅ⲥⲱϥ ⲉⲩ‐ <text:line-break/><text:soft-page-break/><text:span text:style-name="T1"> </text:span><text:span text:style-name="T2">(137/21) </text:span> [ⲛⲁⲣ̅]ⲥⲩⲙ̣ⲫⲱⲛⲓ ⲛⲙ̅ⲙⲏⲧⲛ̅· ⲁⲛⲟⲕ ⲅⲁⲣ <text:line-break/><text:span text:style-name="T1"> </text:span><text:span text:style-name="T2">(137/22) </text:span> [..ϫⲱ] ⲙ̅ⲙⲟⲥ ⲛⲏⲧⲛ̅ ϫⲉⲁⲗⲏⲑⲱⲥ <text:line-break/><text:span text:style-name="T1"> </text:span><text:span text:style-name="T2">(137/23) </text:span> [....].. ϩⲛ̅ⲧⲏⲟⲩⲧⲛ̅ ⲛ̅ϭⲓⲡⲛⲟⲩⲧⲉ <text:line-break/><text:span text:style-name="T1"> </text:span><text:span text:style-name="T2">(138/1) </text:span> ⲉⲧⲟⲛϩ .[ ]. ⲛ̅ϩⲏ <text:line-break/><text:span text:style-name="T1"> </text:span><text:span text:style-name="T2">(138/2) </text:span> ⲧϥ̅· ⲓ̈ⲟⲩⲇ̣[ⲁⲥ ..... ϫⲉⲁⲗ]ⲏ̣ⲑ̣ⲱⲥ ϯ <text:line-break/><text:span text:style-name="T1"> </text:span><text:span text:style-name="T2">(138/3) </text:span> ⲟⲩⲱϣ̣[ ⲡⲉϫ]ⲁ̣ϥ ⲛⲁϥ ⲛ̅‐ <text:line-break/><text:span text:style-name="T1"> </text:span><text:span text:style-name="T2">(138/4) </text:span> ϭⲓⲡϫ[ⲟⲉⲓⲥ ϫⲉ ]ⲉⲧⲟⲛϩ ⲉϥ‐ <text:line-break/><text:span text:style-name="T1"> </text:span><text:span text:style-name="T2">(138/5) </text:span> ϣⲟⲟⲡ̣%6 [ ]. ⲧⲏⲣϥ̅· <text:line-break/><text:span text:style-name="T1"> </text:span><text:span text:style-name="T2">(138/6) </text:span> ⲙ̅ⲡⲉϭⲣⲱ̣[ϩ ⲓ̈ⲟ]ⲩ̣ⲇⲁⲥ ϫⲉ <text:line-break/><text:span text:style-name="T1"> </text:span><text:span text:style-name="T2">(138/7) </text:span> ⲛⲓⲙ ⲡⲉ ⲉⲧⲛ[ ] ⲡⲉϫⲁϥ <text:line-break/><text:span text:style-name="T1"> </text:span><text:span text:style-name="T2">(138/8) </text:span> ⲛ̅ϭⲓⲡϫⲟⲉⲓⲥ̣ [ϫⲉ......]ϩ̣ⲃⲏⲟⲩⲉ <text:line-break/><text:span text:style-name="T1"> </text:span><text:span text:style-name="T2">(138/9) </text:span> ⲧⲏⲣⲟⲩ ⲉ̣ⲧϣⲟ[........]ⲡⲕⲉⲥⲉ <text:line-break/><text:span text:style-name="T1"> </text:span><text:span text:style-name="T2">(138/10) </text:span> ⲉⲡⲉ ⲛ̅ⲧⲟⲟⲩ ⲡⲉ ⲉⲧⲉ̣[ⲧ]ⲛ[...].[.]ϫⲱⲟⲩ <text:line-break/><text:span text:style-name="T1"> </text:span><text:span text:style-name="T2">(138/11) </text:span> ⲡⲉϫⲁϥ ⲛ̅ϭⲓⲓ̈ⲟⲩⲇⲁⲥ ϫⲉⲉⲓⲥϩⲏⲏⲧⲉ <text:line-break/><text:span text:style-name="T1"> </text:span><text:span text:style-name="T2">(138/12) </text:span> ⲉⲓⲥⲛ̅ⲁⲣⲭⲱⲛ ϣⲟⲟⲡ%6 ϩⲛ̅ⲧⲡⲉ ⲙ̅‐ <text:line-break/><text:span text:style-name="T1"> </text:span><text:span text:style-name="T2">(138/13) </text:span> ⲙⲁⲛ ⲛ̅ⲧⲟⲟⲩ ϭⲉ ⲡⲉ ⲉⲧⲛⲁⲣ̅ϫⲟⲉⲓⲥ <text:line-break/><text:span text:style-name="T1"> </text:span><text:span text:style-name="T2">(138/14) </text:span> ⲉϫⲱⲛ· ⲡⲉϫⲁϥ ⲛ̅ϭⲓⲡϫⲟⲉⲓⲥ ϫⲉ ⲛ̅‐ <text:line-break/><text:span text:style-name="T1"> </text:span><text:span text:style-name="T2">(138/15) </text:span> ⲧⲱⲧⲛ̅ ⲡⲉ ⲉⲧⲛⲁⲣ̅ϫⲟⲉⲓⲥ ⲉϫⲱⲟⲩ <text:line-break/><text:span text:style-name="T1"> </text:span><text:span text:style-name="T2">(138/16) </text:span> ⲁⲗⲗⲁ ϩⲟⲧⲁⲛ ⲉⲧⲉⲧⲛ̅ϣⲁⲛϥⲓ ⲙ̅ⲡ[ⲉ]‐ <text:line-break/><text:span text:style-name="T1"> </text:span><text:span text:style-name="T2">(138/17) </text:span> ⲫⲑⲟⲛⲟⲥ ⲉⲃⲟⲗ ϩⲛ̅ⲧⲏⲟⲩⲧⲛ̅ ⲧⲟⲧⲉ <text:line-break/><text:span text:style-name="T1"> </text:span><text:span text:style-name="T2">(138/18) </text:span> ⲧⲉⲧⲛⲁϯ ϩⲓⲱⲧ%6ⲧⲏⲟⲩⲧⲛ̅ ⲙ̅ⲡⲟⲩⲟ̣‐ <text:line-break/><text:span text:style-name="T1"> </text:span><text:span text:style-name="T2">(138/19) </text:span> ⲉⲓⲛ ⲛ̅ⲧⲉⲧⲛ̅ⲃⲱⲕ ⲉϩⲟⲩⲛ ⲉⲡⲙⲁ <text:line-break/><text:span text:style-name="T1"> </text:span><text:span text:style-name="T2">(138/20) </text:span> ⲛ̅ϣⲉⲗⲉⲉⲧ̓ ⲡⲉϫⲉ ⲓ̈ⲟⲩⲇⲁⲥ ϫⲉ ⲛ̣̅‐ <text:line-break/><text:span text:style-name="T1"> </text:span><text:span text:style-name="T2">(138/21) </text:span> ⲁϣ ⲛ̅ϩⲉ ⲉⲩⲛⲁⲉⲓⲛⲉ ⲛⲁⲛ ⲛ̅ⲛⲉ̣[ⲛ] <text:line-break/><text:span text:style-name="T1"> </text:span><text:span text:style-name="T2">(138/22) </text:span> ϩⲃ̅ⲥⲱ· ⲡⲉϫⲉ ⲡϫⲟⲉⲓⲥ ϫⲉ ϩ̣ⲉ̣ⲛ <text:line-break/><text:span text:style-name="T1"> </text:span><text:span text:style-name="T2">(138/23) </text:span> ⲕⲟⲟⲩⲉ ⲛⲉⲧⲛⲁⲉⲓⲛⲉ ⲛⲏⲧⲛ̅ [ⲁⲩⲱ] <text:line-break/><text:span text:style-name="T1"> </text:span><text:span text:style-name="T2">(138/24) </text:span> ϩⲉⲛⲕⲟⲟⲩⲉ ⲛⲉⲧⲛⲁϫⲓ ⲙ̅ⲙ[...] <text:line-break/><text:span text:style-name="T1"> </text:span><text:span text:style-name="T2">(139/1) </text:span> ⲛ̅ⲧⲟⲟⲩ ⲅⲁⲣ ⲛ[ⲉⲧⲛⲁϯ ⲛ]ⲏⲧⲛ̣̅ ⲛ̅ⲛⲉⲧⲛ̅ <text:line-break/><text:span text:style-name="T1"> </text:span><text:span text:style-name="T2">(139/2) </text:span> ϩⲃ̅ⲥⲱ· ⲛⲓⲙ ⲅⲁ̣[ⲣ ⲡⲉⲧⲛⲁ]ϣϫⲱⲃⲉ ⲙ̅‐ <text:line-break/><text:span text:style-name="T1"> </text:span><text:span text:style-name="T2">(139/3) </text:span> ⲡⲙⲁ ⲉⲧⲙ̅ⲙⲁⲩ̣ ...[.]ⲉ̣ⲙ̅ⲡϣⲁ ⲡⲉ <text:line-break/><text:span text:style-name="T1"> </text:span><text:span text:style-name="T2">(139/4) </text:span> ⲁⲗⲗⲁ ⲁⲩϯⲛ̅ϩ̣ⲃ̅ⲥⲱ ⲙ̅ⲡⲱⲛϩ ⲙ̅‐ <text:line-break/><text:span text:style-name="T1"> </text:span><text:span text:style-name="T2">(139/5) </text:span> ⲡⲣⲱⲙⲉ ϫⲉ ⲛ̅ⲧⲟϥ ϥ̣ⲥⲟⲟⲩⲛ ⲛ̅ⲧⲉ <text:line-break/><text:span text:style-name="T1"> </text:span><text:span text:style-name="T2">(139/6) </text:span> ϩⲓⲏ ⲉⲧϥ̅ⲛⲁⲃⲱⲕ ⲛ̅ϩⲏⲧⲥ̅· ⲕⲁⲓ ⲅⲁⲣ ⲟⲩ <text:line-break/><text:span text:style-name="T1"> </text:span><text:span text:style-name="T2">(139/7) </text:span> ⲃⲁⲣⲟⲥ ⲛⲁⲓ̈ ϩⲱⲱⲧ%6 ⲟⲛ ⲧⲉ ⲉϫⲟⲟⲃⲉⲥ <text:line-break/><text:span text:style-name="T1"> </text:span><text:span text:style-name="T2">(139/8) </text:span> ⲡⲉϫⲁⲥ ⲛ̅ϭⲓⲙⲁⲣⲓϩⲁⲙ ϫⲉϩⲓⲛⲁⲓ̈ ⲉⲧ <text:line-break/><text:span text:style-name="T1"> </text:span><text:span text:style-name="T2">(139/9) </text:span> ⲕⲁⲕⲓⲁ ⲙ̅ⲡⲉϩⲟⲟⲩ ⲡⲉϩⲟⲟⲩ ⲁⲩⲱ ⲡⲉⲣ‐ <text:line-break/><text:span text:style-name="T1"> </text:span><text:span text:style-name="T2">(139/10) </text:span> ⲅⲁⲧⲏⲥ ⲙ̅ⲡϣⲁ ⲛ̅ⲧⲉϥⲧⲣⲟⲫⲏ· ⲁⲩⲱ <text:line-break/><text:span text:style-name="T1"> </text:span><text:span text:style-name="T2">(139/11) </text:span> ⲡⲙⲁⲑⲏⲧⲏⲥ ⲛ̅ϥⲉⲓⲛⲉ ⲙ̅ⲡⲉϥⲥⲁϩ· ⲡⲉ <text:line-break/><text:span text:style-name="T1"> </text:span><text:span text:style-name="T2">(139/12) </text:span> ⲉⲓϣⲁϫⲉ ⲁⲥϫⲟⲟϥ ϩⲱⲥ ⲥϩⲓⲙⲉ ⲉⲁⲥⲉⲓ‐ <text:line-break/><text:span text:style-name="T1"> </text:span><text:span text:style-name="T2">(139/13) </text:span> ⲙⲉ ⲉⲡⲧⲏⲣϥ̅· ⲡⲉϫⲁⲩ ⲛⲁϥ ⲛ̅ϭⲓⲙ̅ⲙⲁ‐ <text:line-break/><text:span text:style-name="T1"> </text:span><text:span text:style-name="T2">(139/14) </text:span> ⲑⲏⲧⲏⲥ ϫⲉⲟⲩ ⲡⲉ ⲡⲉⲡⲗⲏⲣⲱⲙⲁ ⲁⲩⲱ <text:line-break/><text:span text:style-name="T1"> </text:span><text:span text:style-name="T2">(139/15) </text:span> ⲟⲩ ⲡⲉ ⲡϣⲱⲱⲧ%6 ⲡⲉϫⲁϥ ⲛⲁⲩ ϫⲉ <text:line-break/><text:span text:style-name="T1"> </text:span><text:span text:style-name="T2">(139/16) </text:span> ⲛ̅ⲧⲱⲧⲛ̅ϩⲉⲛⲉⲃⲟⲗ ϩⲙ̅ⲡⲉⲡⲗⲏⲣⲱ <text:line-break/><text:span text:style-name="T1"> </text:span><text:span text:style-name="T2">(139/17) </text:span> ⲙⲁ ⲁⲩⲱ ⲧⲉⲧⲛ̅ϣⲟⲟⲡ%6 ϩⲙ̅ⲡⲙⲁ ⲉ‐ <text:line-break/><text:span text:style-name="T1"> </text:span><text:span text:style-name="T2">(139/18) </text:span> ⲧ̣ⲉⲡϣⲱⲱⲧ̓ ⲙ̅ⲙⲁⲩ ⲁⲩⲱ ⲉⲓⲥϩⲏ‐ <text:line-break/><text:span text:style-name="T1"> </text:span><text:span text:style-name="T2">(139/19) </text:span> [ⲏⲧ]ⲉ ⲉⲓⲥⲡⲉϥⲟⲩⲟⲉⲓⲛ ⲁϥⲡⲱϩⲧ%6 ⲉ‐ <text:line-break/><text:span text:style-name="T1"> </text:span><text:span text:style-name="T2">(139/20) </text:span> [ϩⲣ]ⲁ̣ⲓ̈ ⲉϫⲱⲉⲓ· ⲡⲉϫⲁϥ ⲛ̅ϭⲓⲙⲁⲑⲑⲁⲓ‐ <text:line-break/><text:soft-page-break/><text:span text:style-name="T1"> </text:span><text:span text:style-name="T2">(139/21) </text:span> [ⲟⲥ] ϫⲉϫⲟⲟⲥ ⲉ{ⲉ}ⲣⲟⲉⲓ ⲡϫⲟⲉⲓⲥ ϫⲉ ⲛ̅‐ <text:line-break/><text:span text:style-name="T1"> </text:span><text:span text:style-name="T2">(139/22) </text:span> [ⲁ]ϣ̣ ⲛ̅ϩⲉ ⲛⲉⲧⲙⲟⲟⲩⲧ%6 ⲥⲉⲙⲟⲩ <text:line-break/><text:span text:style-name="T1"> </text:span><text:span text:style-name="T2">(139/23) </text:span> [ⲁⲩ]ⲱ ⲛ̅ⲁϣ ⲛ̅ϩⲉ ⲛⲉⲧⲟⲛϩ ⲥⲉⲱⲛϩ <text:line-break/><text:span text:style-name="T1"> </text:span><text:span text:style-name="T2">(140/1) </text:span> ⲡⲉϫ̣ⲉⲡϫⲟⲉ̣[ⲓⲥ ϫⲉ..]ϣⲓⲛⲉ ⲙ̅ⲙⲟ‐ <text:line-break/><text:span text:style-name="T1"> </text:span><text:span text:style-name="T2">(140/2) </text:span> ⲉⲓ ⲉⲩϣⲁϫⲉ̣ [... ⲡⲁ]ⲓ̈ ⲉⲧⲉⲙ̅ⲡⲉ‐ <text:line-break/><text:span text:style-name="T1"> </text:span><text:span text:style-name="T2">(140/3) </text:span> ⲃⲁⲗ ⲛⲁⲩ ⲉⲣⲟϥ̣ [ⲟ]ⲩ̣ⲇ̣ⲉ̣ ⲙ̣̅ⲡⲓⲥⲟⲧⲙⲉϥ <text:line-break/><text:span text:style-name="T1"> </text:span><text:span text:style-name="T2">(140/4) </text:span> ⲉⲓ ⲙⲏⲧⲓ ⲛ̅ⲧⲟⲟⲧⲕ ϯϫⲱ ⲇⲉ ⲙ̅ⲙⲟⲥ <text:line-break/><text:span text:style-name="T1"> </text:span><text:span text:style-name="T2">(140/5) </text:span> ⲛⲏⲧⲛ ϫⲉϩⲟⲧⲁⲛ ⲉⲩϣⲁⲛⲥⲱⲕ ⲙ̅‐ <text:line-break/><text:span text:style-name="T1"> </text:span><text:span text:style-name="T2">(140/6) </text:span> ⲡⲁⲓ̈ ⲉⲧⲕⲓⲙ ⲉⲡⲣⲱⲙⲉ ⲥⲉⲛⲁⲙⲟⲩ‐ <text:line-break/><text:span text:style-name="T1"> </text:span><text:span text:style-name="T2">(140/7) </text:span> ⲧⲉ ⲉⲣⲟϥ ϫⲉⲡⲉⲧⲙⲟⲟⲩⲧ%6 ⲁⲩⲱ ϩⲟⲧⲁⲛ <text:line-break/><text:span text:style-name="T1"> </text:span><text:span text:style-name="T2">(140/8) </text:span> ⲉⲣϣⲁⲛⲡⲉⲧⲟⲛϩ ⲕⲱ ⲛ̅ⲡⲉⲧⲙⲟⲟⲩⲧ%6 <text:line-break/><text:span text:style-name="T1"> </text:span><text:span text:style-name="T2">(140/9) </text:span> ⲥⲉⲛⲁⲙⲟⲩⲧⲉ ⲉⲡⲉⲧⲟⲛϩ· ⲡⲉϫⲉ ⲓ̈ⲟⲩ‐ <text:line-break/><text:span text:style-name="T1"> </text:span><text:span text:style-name="T2">(140/10) </text:span> ⲇⲁⲥ ϫⲉ ⲉⲧⲃⲉⲟⲩ ⲅⲁⲣ ⲉϫⲛ̅ⲧⲙⲏⲉ ⲥⲉ‐ <text:line-break/><text:span text:style-name="T1"> </text:span><text:span text:style-name="T2">(140/11) </text:span> ⲙⲟⲩⲟⲩⲧ%6 ⲁⲩⲱ ⲥⲉⲱⲛϩ· ⲡⲉϫⲉ ⲡϫⲟ‐ <text:line-break/><text:span text:style-name="T1"> </text:span><text:span text:style-name="T2">(140/12) </text:span> ⲉⲓⲥ ϫⲉ ⲡⲉⲧⲉⲟⲩⲉⲃⲟⲗ ϩⲛ̅ⲧⲙⲏⲉ ⲡⲉ‐ <text:line-break/><text:span text:style-name="T1"> </text:span><text:span text:style-name="T2">(140/13) </text:span> ⲙⲉϥⲙⲟⲩ ⲡⲉⲧⲉⲟⲩⲉⲃⲟⲗ ϩⲛ̅ⲧⲉⲥϩⲓ‐ <text:line-break/><text:span text:style-name="T1"> </text:span><text:span text:style-name="T2">(140/14) </text:span> ⲙⲉ ⲡⲉ ϣⲁϥⲙⲟⲩ ⲡⲉϫⲉ ⲙⲁⲣⲓϩⲁⲙ <text:line-break/><text:span text:style-name="T1"> </text:span><text:span text:style-name="T2">(140/15) </text:span> ⲙⲏ ϫⲉ ϫⲟⲟⲥ ⲉⲣⲟⲉⲓ ⲡϫⲟⲉⲓⲥ ϫⲉ ⲉ‐ <text:line-break/><text:span text:style-name="T1"> </text:span><text:span text:style-name="T2">(140/16) </text:span> ⲧⲃⲉⲟⲩ ⲁⲉⲓⲉⲓ ⲉⲡⲉⲉⲓⲙⲁ ⲉϭⲛ̅ϩⲏⲟⲩ <text:line-break/><text:span text:style-name="T1"> </text:span><text:span text:style-name="T2">(140/17) </text:span> ⲏ͂ ⲉϯⲟⲥⲉ ⲡⲉϫⲉ ⲡϫⲟⲉⲓⲥ ϫⲉ ⲉⲣⲉⲟⲩ‐ <text:line-break/><text:span text:style-name="T1"> </text:span><text:span text:style-name="T2">(140/18) </text:span> ⲱⲛϩ ⲉⲃⲟⲗ ⲙ̅ⲡⲉϩⲟⲩⲟ ⲙ̅ⲡⲙⲏⲛⲩ‐ <text:line-break/><text:span text:style-name="T1"> </text:span><text:span text:style-name="T2">(140/19) </text:span> ⲧⲏⲥ ⲡⲉϫⲉ ⲙⲁⲣⲓϩⲁⲙⲙⲏ ⲛⲁϥ· ϫ̣[ⲉ] <text:line-break/><text:span text:style-name="T1"> </text:span><text:span text:style-name="T2">(140/20) </text:span> ⲡϫⲟⲉⲓⲥ ⲟⲩⲛⲧⲟⲡⲟⲥ ⲅⲁⲣ ⲉϥⲁⲣⲓ. <text:line-break/><text:span text:style-name="T1"> </text:span><text:span text:style-name="T2">(140/21) </text:span> ⲏ ⲉϥϭⲣⲱϩ ⲉⲃⲟⲗ ϩⲛ̅ⲧⲙⲏⲉ ⲡⲉϫⲉ̣ <text:line-break/><text:span text:style-name="T1"> </text:span><text:span text:style-name="T2">(140/22) </text:span> ⲡϫⲟⲉⲓⲥ ϫⲉ ⲡⲙⲁ ⲁⲛⲟⲕ ⲉⲧⲉⲛ̅ϯ <text:line-break/><text:span text:style-name="T1"> </text:span><text:span text:style-name="T2">(140/23) </text:span> ⲙ̅ⲙⲟϥ ⲁⲛ· ⲡⲉϫⲉ ⲙⲁⲣⲓϩⲁⲙⲙⲏ̣ <text:line-break/><text:span text:style-name="T1"> </text:span><text:span text:style-name="T2">(140/24) </text:span> ϫⲉ ⲡϫⲟⲉⲓⲥ ⲛ̅ⲧⲕⲟⲩϩⲟⲧⲉ ϩⲓϣⲡ[ⲏ]‐ <text:line-break/><text:span text:style-name="T1"> </text:span><text:span text:style-name="T2">(141/1) </text:span> ⲣⲉ ⲁⲩⲱ ⲟⲩ.[......]ⲱⲧⲉ̣ ⲉ‐ <text:line-break/><text:span text:style-name="T1"> </text:span><text:span text:style-name="T2">(141/2) </text:span> ⲃⲟⲗ ⲛ̅ⲛⲉⲧⲥⲟⲟⲩⲛ ⲙ̣̅ⲙ[ⲟ.] ⲁ̣ⲛ· ⲡⲉ‐ <text:line-break/><text:span text:style-name="T1"> </text:span><text:span text:style-name="T2">(141/3) </text:span> ϫⲉⲙⲁⲑⲑⲁⲓⲟⲥ ϫⲉⲉⲧ̣[ⲃ]ⲉⲟⲩ ⲧⲛ̅ⲙ̅‐ <text:line-break/><text:span text:style-name="T1"> </text:span><text:span text:style-name="T2">(141/4) </text:span> ⲧⲟⲛ ⲙ̅ⲙⲟⲛ ⲁⲛ ϩⲓⲟⲩ[ⲥ]ⲟⲡ%6 ⲡⲉϫⲉ <text:line-break/><text:span text:style-name="T1"> </text:span><text:span text:style-name="T2">(141/5) </text:span> ⲡϫⲟⲉⲓⲥ ϫⲉ ⲉⲧⲉⲧⲛ̅ϣⲁⲛⲕⲱ ⲉⲡⲓ‐ <text:line-break/><text:span text:style-name="T1"> </text:span><text:span text:style-name="T2">(141/6) </text:span> ⲧⲛ̅ ⲛ̅ⲛⲁⲓ̈ⲉⲧⲡⲱ· ⲡⲉϫⲉ ⲙⲁⲑⲑⲁⲓ‐ <text:line-break/><text:span text:style-name="T1"> </text:span><text:span text:style-name="T2">(141/7) </text:span> ⲟⲥ ϫⲉ ⲛ̅ⲁϣ ⲛ̅ϩⲉ ϣⲁⲣⲉⲡⲕⲟⲩⲉⲓ <text:line-break/><text:span text:style-name="T1"> </text:span><text:span text:style-name="T2">(141/8) </text:span> ⲕⲟⲗⲗⲁ ⲙ̅ⲙⲟϥ ⲉⲡⲛⲟϭ ⲡⲉϫⲉ ⲡϫⲟ‐ <text:line-break/><text:span text:style-name="T1"> </text:span><text:span text:style-name="T2">(141/9) </text:span> ⲉⲓⲥ ϫⲉ ϩⲟⲧⲁⲛ ⲉⲧⲉⲧⲛ̅ϣⲁⲛⲕⲱ ⲛ̅‐ <text:line-break/><text:span text:style-name="T1"> </text:span><text:span text:style-name="T2">(141/10) </text:span> ⲛⲉϩⲃⲏⲟⲩⲉ ⲛ̅ⲥⲱⲧⲛ̅ ⲉⲧⲉⲛ̅ⲥⲉⲛⲁϣ <text:line-break/><text:span text:style-name="T1"> </text:span><text:span text:style-name="T2">(141/11) </text:span> ⲟⲩⲁϩⲟⲩ ⲛ̅ⲥⲱⲧⲛ̅ ⲁⲛ ⲧⲟⲧⲉ ⲧⲉⲧⲛ̅ⲛⲁⲙ̅‐ <text:line-break/><text:span text:style-name="T1"> </text:span><text:span text:style-name="T2">(141/12) </text:span> ⲧⲟⲛ ⲙ̅ⲙⲱⲧⲛ̅ ⲡⲉϫⲉ ⲙⲁⲣⲓϩⲁⲙⲙⲏ <text:line-break/><text:span text:style-name="T1"> </text:span><text:span text:style-name="T2">(141/13) </text:span> ϫ̣ⲉ ϯⲟⲩⲱϣⲉ ⲉⲉⲓⲙⲉ ⲉϩⲱⲃ ⲛⲓⲙ ⲛ̅‐ <text:line-break/><text:span text:style-name="T1"> </text:span><text:span text:style-name="T2">(141/14) </text:span> [ⲑⲉ] ⲉⲧⲟⲩϣⲟⲟⲡ%6 ⲙ̅ⲙⲟⲥ ⲡⲉϫⲉ ⲡϫⲟ‐ <text:line-break/><text:span text:style-name="T1"> </text:span><text:span text:style-name="T2">(141/15) </text:span> [ⲉⲓⲥ] ϫⲉ ⲡⲉⲧⲛⲁϣⲓⲛⲉ ⲛ̅ⲥⲁⲡⲱⲛϩ· <text:line-break/><text:span text:style-name="T1"> </text:span><text:span text:style-name="T2">(141/16) </text:span> [.ⲁ]ⲉ̣ⲓ ⲅⲁⲣ ⲧⲉ ⲧⲟⲩⲙⲛ̅ⲧⲣⲙ̅ⲙⲁⲟ· ⲧⲁ <text:line-break/><text:span text:style-name="T1"> </text:span><text:span text:style-name="T2">(141/17) </text:span> [...]ⲁ̣ⲩⲥⲓⲥ ⲅⲁⲣ ⲙ̅ⲡⲉⲉⲓⲕⲟⲥⲙⲟⲥ ⲟⲩ <text:line-break/><text:span text:style-name="T1"> </text:span><text:span text:style-name="T2">(141/18) </text:span> [.. ⲧ]ⲉ ⲁⲩⲱ ⲡⲉϥⲛⲟⲩⲃ ⲙⲛ̅ⲡⲉϥϩⲁⲧ%6 <text:line-break/><text:span text:style-name="T1"> </text:span><text:span text:style-name="T2">(141/19) </text:span> [ⲟⲩⲥ]ⲱⲣⲙ̅ ⲡⲉ· ⲡⲉϫⲁⲩ ⲛⲁϥ ⲛ̅ϭⲓⲛⲉϥ <text:line-break/><text:span text:style-name="T1"> </text:span><text:span text:style-name="T2">(141/20) </text:span> [ⲙⲁ]ⲑⲏⲧⲏⲥ ϫⲉⲟⲩ ⲡⲉⲧⲛ̅ⲛⲁⲁϥ ϫⲉ <text:line-break/><text:soft-page-break/><text:span text:style-name="T1"> </text:span><text:span text:style-name="T2">(141/21) </text:span> [ⲕⲁⲁ]ⲥ ⲉⲣⲉⲡⲉⲛϩⲱⲃ ⲛⲁϫⲱⲕ ⲉⲃⲟⲗ· <text:line-break/><text:span text:style-name="T1"> </text:span><text:span text:style-name="T2">(141/22) </text:span> [ⲡⲉϫ]ⲉⲡϫⲟⲉⲓⲥ ⲛⲁⲩ ϫⲉϣⲱⲡⲉ ⲉⲧⲉ <text:line-break/><text:span text:style-name="T1"> </text:span><text:span text:style-name="T2">(141/23) </text:span> [ⲧⲛ̅ⲥ]ⲃ̣̅ⲧⲱⲧ̓ ⲛ̅ⲛⲁϩⲣⲛ̅ⲡⲧⲏⲣϥ· ⲟⲩ‐ <text:line-break/><text:span text:style-name="T1"> </text:span><text:span text:style-name="T2">(141/24) </text:span> [ⲙⲁ]ⲕ̣ⲁⲣⲓⲟⲥ ⲡⲉ ⲡⲣⲱⲙⲉ ⲛ̅ⲧⲁϥϭⲓⲛⲉ <text:line-break/><text:span text:style-name="T1"> </text:span><text:span text:style-name="T2">(142/1) </text:span> ⲙ̅ⲡ.ⲟⲗ.[......].ⲩⲉⲡⲁⲅⲱⲛ ⲛ̅‐ <text:line-break/><text:span text:style-name="T1"> </text:span><text:span text:style-name="T2">(142/2) </text:span> ⲛⲉϥⲃⲁⲗ· [..]. ⲙ̣̅ⲡⲉϥϩⲱⲧⲃ̅ ⲟⲩⲇⲉ ⲙ̅‐ <text:line-break/><text:span text:style-name="T1"> </text:span><text:span text:style-name="T2">(142/3) </text:span> ⲡⲟⲩϩⲟⲧⲃ[ⲉϥ] ⲁⲗⲗⲁ ⲁϥⲉⲓ ⲉⲃⲟⲗ ⲉϥϫⲣⲁ‐ <text:line-break/><text:span text:style-name="T1"> </text:span><text:span text:style-name="T2">(142/4) </text:span> ⲉⲓⲧ%6 ⲡⲉϫⲉ ⲓ̈[ⲟ]ⲩ̣ⲇⲁⲥ ϫⲉ ϫⲟⲟⲥ ⲉⲣⲟⲉⲓ ⲡϫⲟ‐ <text:line-break/><text:span text:style-name="T1"> </text:span><text:span text:style-name="T2">(142/5) </text:span> ⲉⲓⲥ ϫⲉⲁϣ ⲧⲉ ⲧⲁⲣⲭⲏ ⲛ̅ⲧⲉϩⲓⲏ ⲡⲉϫⲁϥ <text:line-break/><text:span text:style-name="T1"> </text:span><text:span text:style-name="T2">(142/6) </text:span> ϫⲉⲧⲁⲅⲁⲡⲏ ⲙⲛ̣̅ⲧⲙⲛ̅ⲧⲁⲅⲁⲑⲟⲥ ⲉⲛⲉ <text:line-break/><text:span text:style-name="T1"> </text:span><text:span text:style-name="T2">(142/7) </text:span> ⲟⲩⲛ̅ⲟⲩⲉⲓ ⲅⲁ̣ⲣ ⲛ̣̅ⲛⲁⲓ̈ ϣⲟⲟⲡ%6 ϩⲁⲧⲛ̅ⲛ̅‐ <text:line-break/><text:span text:style-name="T1"> </text:span><text:span text:style-name="T2">(142/8) </text:span> ⲁⲣⲭⲱⲛ ⲛⲉⲙⲛ̅ⲕⲁⲕⲓⲁ ⲛⲁϣⲱⲡⲉ ⲁ‐ <text:line-break/><text:span text:style-name="T1"> </text:span><text:span text:style-name="T2">(142/9) </text:span> ⲛⲏϩⲉ· ⲡⲉϫ̣ⲉⲙⲁⲑⲑⲁⲓⲟⲥ ϫⲉⲡϫⲟⲉⲓⲥ <text:line-break/><text:span text:style-name="T1"> </text:span><text:span text:style-name="T2">(142/10) </text:span> ⲁⲕϣⲁϫⲉ ⲉⲧⲃⲉⲑⲁⲏ ⲙ̅ⲡⲧⲏⲣϥ· ⲁϫⲛ̅ϩⲓ‐ <text:line-break/><text:span text:style-name="T1"> </text:span><text:span text:style-name="T2">(142/11) </text:span> ⲥⲉ ⲡⲉϫⲉ ⲡϫⲟⲉⲓⲥ ϫⲉ ϩⲱⲃ ⲛⲓⲙ· ⲛ̅ⲧⲁ‐ <text:line-break/><text:span text:style-name="T1"> </text:span><text:span text:style-name="T2">(142/12) </text:span> ⲉⲓϫⲟⲟⲩ ⲉⲣⲱⲧⲛ̅ ⲁⲧⲉⲧⲛ̅ⲉⲓⲙⲉ ⲙ̅ⲙⲟ‐ <text:line-break/><text:span text:style-name="T1"> </text:span><text:span text:style-name="T2">(142/13) </text:span> ⲟⲩ ⲁⲩⲱ ⲁⲧⲉⲧⲛ̅ϫⲓⲧⲟⲩ ϩⲛ̅ⲟⲩⲛⲁϩⲧⲉ <text:line-break/><text:span text:style-name="T1"> </text:span><text:span text:style-name="T2">(142/14) </text:span> ⲉϣϫⲉⲁⲧⲉⲧⲛ̅ⲥⲟⲩⲱⲛⲟⲩ ϩⲓⲉ ⲛⲱⲧ̣ⲛ̣̅ <text:line-break/><text:span text:style-name="T1"> </text:span><text:span text:style-name="T2">(142/15) </text:span> ⲛⲉ ⲉϣϫⲉⲙ̅ⲡⲉ ϩⲓⲉ ⲛⲱⲧⲛ̅ ⲁⲛ ⲛⲉ̣ <text:line-break/><text:span text:style-name="T1"> </text:span><text:span text:style-name="T2">(142/16) </text:span> ⲡⲉϫⲁⲩ ⲛⲁϥ ϫⲉⲁϣ ⲡⲉ ⲡⲧⲟⲡⲟⲥ [ⲉ]‐ <text:line-break/><text:span text:style-name="T1"> </text:span><text:span text:style-name="T2">(142/17) </text:span> ⲧⲛ̅ⲛⲁⲃⲱⲕ ⲉⲣⲟϥ· ⲡⲉϫⲉ ⲡϫⲟⲉⲓ̣[ⲥ] <text:line-break/><text:span text:style-name="T1"> </text:span><text:span text:style-name="T2">(142/18) </text:span> ϫⲉ ⲡⲙⲁ ⲉⲧⲉⲧⲛ̅ⲛⲁϣⲡⲱϩ ϣ[....] <text:line-break/><text:span text:style-name="T1"> </text:span><text:span text:style-name="T2">(142/19) </text:span> ⲱ͂ϩⲉ ⲉⲣⲉⲧ̓ⲧⲏⲟⲩⲧⲛ̅ ⲙ̅ⲙⲁⲩ· ⲡ[ⲉ]‐ <text:line-break/><text:span text:style-name="T1"> </text:span><text:span text:style-name="T2">(142/20) </text:span> ϫⲉ ⲙⲁⲣⲓϩⲁⲙⲙⲏ ϫⲉ ϩⲱⲃ ⲛⲓⲙ [ⲉ.] <text:line-break/><text:span text:style-name="T1"> </text:span><text:span text:style-name="T2">(142/21) </text:span> ⲥⲙⲟⲛⲧ%6 ⲛ̅ⲧⲉⲓϩⲉ ⲥⲉⲛⲁⲩ ⲉⲣⲟϥ [ⲡⲉ]‐ <text:line-break/><text:span text:style-name="T1"> </text:span><text:span text:style-name="T2">(142/22) </text:span> ϫⲉ ⲡϫⲟⲉⲓⲥ ϫⲉ ⲁⲉⲓϫⲟⲟⲥ ⲛⲏⲧⲛ̣̅ [ϫⲉ] <text:line-break/><text:span text:style-name="T1"> </text:span><text:span text:style-name="T2">(142/23) </text:span> ⲡⲉⲧⲛⲁⲩ ⲉⲃⲟⲗ ⲛ̅ⲧⲟϥ ⲡⲉⲧϭⲱⲗ[ⲡ%6] <text:line-break/><text:span text:style-name="T1"> </text:span><text:span text:style-name="T2">(142/24) </text:span> ⲉⲃⲟⲗ· ⲁⲩϫⲛⲟⲩϥ ⲛ̅ϭⲓⲛⲉϥⲙⲁⲑⲏ[ⲧⲏⲥ] <text:line-break/><text:span text:style-name="T1"> </text:span><text:span text:style-name="T2">(142/25) </text:span> ⲉⲩⲙⲁϩⲙⲛ̅ⲧⲥ̅ⲛⲟⲟⲩⲥ ϫⲉⲡⲥⲁϩ [..] <text:line-break/><text:span text:style-name="T1"> </text:span><text:span text:style-name="T2">(143/1) </text:span> [ⲧ]ⲙⲛ̅ⲧ%6ⲁⲧⲣⲟⲟ[ⲩϣ ]ⲙ̣ⲁ̣ <text:line-break/><text:span text:style-name="T1"> </text:span><text:span text:style-name="T2">(143/2) </text:span> ⲧⲥⲁⲃⲟⲛ ϫ[ ] ⲡⲉϫ̣ⲉ̣ <text:line-break/><text:span text:style-name="T1"> </text:span><text:span text:style-name="T2">(143/3) </text:span> ⲡϫⲟⲉⲓⲥ ϫⲉ.[.........].ⲉ ⲉϩⲱⲃ <text:line-break/><text:span text:style-name="T1"> </text:span><text:span text:style-name="T2">(143/4) </text:span> ⲛⲓⲙ ⲛ̅ⲧⲁⲉⲓϫ[........]ⲧⲉⲧⲛⲁⲣ̅ⲁ <text:line-break/><text:span text:style-name="T1"> </text:span><text:span text:style-name="T2">(143/5) </text:span> .[..].ⲩ.ⲉ̣ⲧⲉⲧ̣ⲛ[....].ⲉϩⲱⲃ <text:line-break/><text:span text:style-name="T1"> </text:span><text:span text:style-name="T2">(143/6) </text:span> ⲛⲓⲙ ⲡⲉϫⲉ ⲙⲁⲣⲓ̣[ϩⲁⲙ ϫ]ⲉ ⲟⲩϣⲁ‐ <text:line-break/><text:span text:style-name="T1"> </text:span><text:span text:style-name="T2">(143/7) </text:span> ϫⲉ ⲛ̅ⲟⲩⲱⲧ%6 ⲡⲉϯⲛⲁ[ϫⲟ]ⲟ̣ϥ ⲙ̅ⲡϫⲟ‐ <text:line-break/><text:span text:style-name="T1"> </text:span><text:span text:style-name="T2">(143/8) </text:span> ⲉⲓ̣ⲥ ⲉⲧⲃⲉⲡⲙⲩⲥⲧⲏⲣⲓⲟⲛ̣ ⲛ̅ⲧⲙⲏⲉ <text:line-break/><text:span text:style-name="T1"> </text:span><text:span text:style-name="T2">(143/9) </text:span> ⲡⲁⲓ̈ ⲛ̅ⲧⲁⲛⲱϩⲉ ⲉⲣⲁⲧⲛ̅ ⲛ̣̅ϩⲏⲧϥ̅· ⲁⲩⲱ <text:line-break/><text:span text:style-name="T1"> </text:span><text:span text:style-name="T2">(143/10) </text:span> ⲉ̣ⲛⲟⲩⲟⲛϩ ⲉⲃⲟⲗ ⲛ̅ⲛ̅ⲕⲟⲥⲙⲓⲕⲟⲛ <text:line-break/><text:span text:style-name="T1"> </text:span><text:span text:style-name="T2">(143/11) </text:span> ⲡ̣ⲉϫⲉ ⲓ̈ⲟⲩⲇⲁⲥ ⲙ̅ⲙⲁⲑⲑⲁⲓⲟⲥ ϫⲉ ⲧⲛ̅‐ <text:line-break/><text:span text:style-name="T1"> </text:span><text:span text:style-name="T2">(143/12) </text:span> [ⲟ]ⲩ̣ⲱϣ ⲉ{ⲉ̅ⲓ}ⲙⲉ ϫⲉϩⲉⲛ̣ⲁϣ ⲛ̅ⲙⲓⲛⲉ <text:line-break/><text:span text:style-name="T1"> </text:span><text:span text:style-name="T2">(143/13) </text:span> [ⲛ]ⲉ ⲛ̅ϩⲃ̅ⲥⲱ ⲉⲧⲟⲩⲛⲁ[ⲧ]ⲁⲁⲩ ϩⲓⲱⲱⲛ <text:line-break/><text:span text:style-name="T1"> </text:span><text:span text:style-name="T2">(143/14) </text:span> [ⲉ]ⲛ̣ϣⲁⲛ{ⲉ̅ⲓ} ⲉⲃⲟⲗ ϩⲙ̅ⲡⲧⲁⲕⲟ ⲛ̅ⲧ‐ <text:line-break/><text:span text:style-name="T1"> </text:span><text:span text:style-name="T2">(143/15) </text:span> [ⲥⲁⲣ]ⲝ· ⲡⲉϫⲉ ⲡϫⲟⲉⲓⲥ ϫⲉ ⲛ̅ⲁⲣⲭⲱⲛ <text:line-break/><text:span text:style-name="T1"> </text:span><text:span text:style-name="T2">(143/16) </text:span> [ⲙⲛ̅]ⲛ̅ⲇⲓⲟⲓⲕⲏⲧⲏⲥ ⲟⲩⲛ̅ⲧⲁⲩ ⲙ̅ⲙⲁⲩ <text:line-break/><text:span text:style-name="T1"> </text:span><text:span text:style-name="T2">(143/17) </text:span> [ⲛ̅ϩ]ⲉⲛϩⲃ̅ⲥⲱ ⲉⲩϯ ⲙ̅ⲙⲟⲟⲩ ⲡⲣⲟⲥⲟⲩ‐ <text:line-break/><text:span text:style-name="T1"> </text:span><text:span text:style-name="T2">(143/18) </text:span> [ⲟⲉⲓ]ϣ ⲉⲩⲙⲏⲛ ⲉⲃⲟⲗ ⲁⲛ· ⲛ̅ⲧⲱⲧⲛ̅ <text:line-break/><text:soft-page-break/><text:span text:style-name="T1"> </text:span><text:span text:style-name="T2">(143/19) </text:span> [ⲇⲉ] ϩ̣ⲱⲥ ϣⲏⲣⲉ ⲛ̅ⲧⲙⲏⲉ ⲉⲧⲉⲧⲛⲁϯ <text:line-break/><text:span text:style-name="T1"> </text:span><text:span text:style-name="T2">(143/20) </text:span> [ϩⲓ]ⲱⲧⲧⲏⲟⲩⲧⲛ̅ ⲁⲛ ⲛ̅ⲛⲓϩⲃ̅ⲥⲱ ⲉⲧϣⲟ‐ <text:line-break/><text:span text:style-name="T1"> </text:span><text:span text:style-name="T2">(143/21) </text:span> [ⲟⲡ%6] ⲡⲣⲟⲥⲟⲩⲟⲉⲓϣ· ⲁⲗⲗⲁ ϯϫⲱ ⲙ̅ⲙⲟⲥ <text:line-break/><text:span text:style-name="T1"> </text:span><text:span text:style-name="T2">(143/22) </text:span> [ⲛ]ⲏ̣ⲧⲛ ϫⲉⲧⲉⲧⲛ̅ⲛⲁϣⲱⲡⲉ ⲙ̅ⲙⲁⲕⲁ‐ <text:line-break/><text:span text:style-name="T1"> </text:span><text:span text:style-name="T2">(143/23) </text:span> [ⲣⲓ]ⲟ̣ⲥ· ϩⲟⲧⲁⲛ ⲉⲧⲉⲧⲛ̅ϣⲁⲛⲃⲉϣⲧⲏ‐ <text:line-break/><text:span text:style-name="T1"> </text:span><text:span text:style-name="T2">(143/24) </text:span> [ⲛⲟ]ⲩ· ⲟⲩⲛⲟϭ ⲅⲁⲣ ⲁⲛ ⲛ̅ϩⲱⲃ ⲡⲉ <text:line-break/><text:span text:style-name="T1"> </text:span><text:span text:style-name="T2">(144/1) </text:span> ⲉ[ ]ⲛ̅ⲡⲥⲁⲛⲃⲟⲗ <text:line-break/><text:span text:style-name="T1"> </text:span><text:span text:style-name="T2">(144/2) </text:span> ⲡ̣ⲉϫ[ ϫⲉ ]ϯϣⲁϫⲉ ϯ <text:line-break/><text:span text:style-name="T1"> </text:span><text:span text:style-name="T2">(144/3) </text:span> ϣⲱⲡ[.........]. ⲡⲉϫⲉ ⲡϫⲟ‐ <text:line-break/><text:span text:style-name="T1"> </text:span><text:span text:style-name="T2">(144/4) </text:span> ⲉⲓⲥ ϫⲉ .[.......]ⲁ̣ⲣⲙ̅ⲡⲉ̣ⲧ̣ⲛ̅ⲉⲓ <text:line-break/><text:span text:style-name="T1"> </text:span><text:span text:style-name="T2">(144/5) </text:span> ⲱⲧ%6 ⲛ̅ⲙ[.......]ⲟ̣ϥ̣· ⲡⲉϫ[ⲉ ⲙⲁ]‐ <text:line-break/><text:span text:style-name="T1"> </text:span><text:span text:style-name="T2">(144/6) </text:span> ⲣⲓϩⲁⲙ· ϫ̣[ⲉ ⲟⲩⲁ]ϣ̣ ⲛ̅ϩⲉ ⲧⲉ ϯⲃⲗ̣̅ⲃ̣[ⲓ]ⲗ̣ⲉ̣ <text:line-break/><text:span text:style-name="T1"> </text:span><text:span text:style-name="T2">(144/7) </text:span> ⲛ̅ϣⲗ̅ⲧⲁ̣[ⲙ] ⲟ̣ⲩⲉⲃⲟⲗ ϩⲛ̅ⲧⲡⲉ ⲧⲉ ⲏ͂ ⲟⲩ <text:line-break/><text:span text:style-name="T1"> </text:span><text:span text:style-name="T2">(144/8) </text:span> ⲉⲃⲟⲗ ϩⲛ̅ⲡ̣ⲕ̣ⲁϩ ⲧⲉ· ⲡⲉϫⲉ ⲡϫⲟⲉⲓⲥ̣ <text:line-break/><text:span text:style-name="T1"> </text:span><text:span text:style-name="T2">(144/9) </text:span> ϫⲉ ⲛ̅ⲧⲉⲣⲉⲡ̣ⲉ̣ⲓⲱⲧ%6 ⲧⲁϩⲟ ⲉⲣⲁⲧϥ̅ ⲙ̅ⲡ‐ <text:line-break/><text:span text:style-name="T1"> </text:span><text:span text:style-name="T2">(144/10) </text:span> ⲕⲟⲥⲙⲟⲥ ⲛⲁϥ· ⲁϥⲥⲉϫⲡ%6ϩⲁϩ ϩⲓⲧⲛ̅ <text:line-break/><text:span text:style-name="T1"> </text:span><text:span text:style-name="T2">(144/11) </text:span> ⲧⲙⲁⲁⲩ ⲙ̅ⲡⲧⲏⲣϥ· ⲉⲧⲃⲉⲡⲁⲓ̈ ϥϫⲱ ⲁⲩ̣‐ <text:line-break/><text:span text:style-name="T1"> </text:span><text:span text:style-name="T2">(144/12) </text:span> ⲱ ϥⲉⲓⲣⲉ ⲡⲉϫⲉ ⲓ̈ⲟⲩⲇⲁⲥ ϫⲉ ⲛ̅ⲧⲁ̣ⲕ̣ <text:line-break/><text:span text:style-name="T1"> </text:span><text:span text:style-name="T2">(144/13) </text:span> ϫⲱ ⲙ̅ⲡⲁⲓ̈ ⲛ̣ⲁ̣ⲛ ⲉⲃⲟⲗ ϩⲙ̅ⲡⲛⲟⲩⲥ ⲛ̅‐ <text:line-break/><text:span text:style-name="T1"> </text:span><text:span text:style-name="T2">(144/14) </text:span> ⲧⲙⲏⲉ ϩⲟⲧ[ⲁ]ⲛ ⲉⲛϣⲁϣⲗⲏⲗ ⲉⲛⲁ <text:line-break/><text:span text:style-name="T1"> </text:span><text:span text:style-name="T2">(144/15) </text:span> ϣⲗⲏⲗ ⲛ̅ⲁϣ ⲛ̅ϩⲉ· ⲡⲉϫⲉ ⲡϫⲟⲉⲓⲥ [ϫⲉ] <text:line-break/><text:span text:style-name="T1"> </text:span><text:span text:style-name="T2">(144/16) </text:span> ϣⲗⲏⲗ ϩⲙ̅ⲡⲙⲁ ⲉⲧⲉⲙⲛ̅ⲥϩⲓⲙⲉ ⲙ̅[ⲙⲁⲩ] <text:line-break/><text:span text:style-name="T1"> </text:span><text:span text:style-name="T2">(144/17) </text:span> ⲡⲉϫⲉ ⲙⲁⲑⲑⲁⲓⲟⲥ ϫⲉ ⲉϥϫⲱ ⲙ̅ⲙ̣[ⲟⲥ] <text:line-break/><text:span text:style-name="T1"> </text:span><text:span text:style-name="T2">(144/18) </text:span> ⲛⲁⲛ ϫⲉϣⲗⲏⲗ ϩⲙ̅ⲡⲙⲁ ⲉ̣ⲧ̣ⲉ̣ⲙ̣[ⲛ̅ⲥϩⲓ]‐ <text:line-break/><text:span text:style-name="T1"> </text:span><text:span text:style-name="T2">(144/19) </text:span> ⲙⲉ ⲙ̅ⲙⲁⲩ ϫⲉⲉⲣⲓⲕⲁⲧⲁⲗⲩⲉ ⲛ̅ⲛ[ⲉ]‐ <text:line-break/><text:span text:style-name="T1"> </text:span><text:span text:style-name="T2">(144/20) </text:span> ϩⲃⲏⲟⲩⲉ ⲛ̅ⲧⲙⲛ̅ⲧⲥϩⲓⲙⲉ ϫⲉϭⲉϫ̣[ⲡⲟ] <text:line-break/><text:span text:style-name="T1"> </text:span><text:span text:style-name="T2">(144/21) </text:span> ⲁⲛ ⲡⲉ ⲁⲗⲗⲁ ϫⲉⲥⲉⲛⲁⲟⲩⲱ ⲛ̅ⲥⲉ̣[ϫⲡⲟ] <text:line-break/><text:span text:style-name="T1"> </text:span><text:span text:style-name="T2">(144/22) </text:span> ⲡⲉϫⲉ ⲙⲁⲣⲓϩⲁⲙ ϫⲉ ⲥⲉⲛⲁϥⲟⲧⲟⲩ ⲉ̣[ⲃⲟⲗ] <text:line-break/><text:span text:style-name="T1"> </text:span><text:span text:style-name="T2">(144/23) </text:span> ⲁⲛ ϣⲁⲉⲛⲉϩ· ⲡⲉϫⲉ ⲡϫⲟⲉⲓⲥ ϫⲉ [ⲛⲓⲙ] <text:line-break/><text:span text:style-name="T1"> </text:span><text:span text:style-name="T2">(144/24) </text:span> ⲡⲉ ⲉⲧⲥⲟⲟⲩⲛ ϫⲉⲥⲉⲛⲁⲃⲱⲗ ⲉⲃⲟⲗ̣ [ⲁⲛ] <text:line-break/><text:span text:style-name="T1"> </text:span><text:span text:style-name="T2">(145/1) </text:span> [ⲁ]ⲩ̣ⲱ ⲛ̅ⲥⲉⲕ[ ]. <text:line-break/><text:span text:style-name="T1"> </text:span><text:span text:style-name="T2">(145/2) </text:span> [.].ⲉ ⲛ̅ⲧⲙⲛ̅ⲧ[.........]..ⲡ̣ⲟⲥ <text:line-break/><text:span text:style-name="T1"> </text:span><text:span text:style-name="T2">(145/3) </text:span> ⲡⲉϫⲉ ⲓ̈ⲟⲩⲇⲁⲥ̣ [ⲙ̅ⲙⲁⲑⲑ]ⲁ̣ⲓⲟⲥ ϫⲉ <text:line-break/><text:span text:style-name="T1"> </text:span><text:span text:style-name="T2">(145/4) </text:span> [ⲥ]ⲉⲛⲁⲃⲱⲗ ⲉⲃ[ⲟⲗ ....ϩⲃ]ⲏⲟⲩⲉ ⲛ̅‐ <text:line-break/><text:span text:style-name="T1"> </text:span><text:span text:style-name="T2">(145/5) </text:span> [ⲧ]ⲙⲛ̅ⲧⲥ̅[ ]ⲛ̅ⲁⲣⲭⲱⲛ <text:line-break/><text:span text:style-name="T1"> </text:span><text:span text:style-name="T2">(145/6) </text:span> [..]ⲛⲁⲣ̅ⲉⲡⲓ....[....].ⲁ ⲉⲛⲁϣⲱ‐ <text:line-break/><text:span text:style-name="T1"> </text:span><text:span text:style-name="T2">(145/7) </text:span> [ⲡ]ⲉ ⲛ̅ϯϩⲉ ⲉⲛⲥⲃ̅ⲧⲱⲧ̣%6 [ⲉ]ⲣ̣ⲟⲟⲩ ⲡⲉ <text:line-break/><text:span text:style-name="T1"> </text:span><text:span text:style-name="T2">(145/8) </text:span> [ϫⲉⲡ]ϫ̣ⲟⲉⲓⲥ ϫⲉⲙⲏ ⲅⲁⲣ ⲥⲉⲛⲁⲩ ⲉⲣⲱ‐ <text:line-break/><text:span text:style-name="T1"> </text:span><text:span text:style-name="T2">(145/9) </text:span> [ⲧⲛ̅ ⲙⲏ ⲥⲉⲛ]ⲁⲩ ⲉⲛⲉⲧⲡⲁⲣⲁⲗⲁⲙⲃⲁⲛⲉ <text:line-break/><text:span text:style-name="T1"> </text:span><text:span text:style-name="T2">(145/10) </text:span> [ⲙ̅ⲙⲱ]ⲧ̣ⲛ̣̅· ⲉⲓⲥϩⲏⲏⲧⲉ ϭⲉ ⲟⲩϣⲁϫⲉ <text:line-break/><text:span text:style-name="T1"> </text:span><text:span text:style-name="T2">(145/11) </text:span> [ⲡⲁⲧ]ⲡⲉ ⲛⲏⲟⲩ ⲉⲃⲟⲗ ϩⲓⲧⲙ̅ⲡⲉⲓⲱⲧ%6 <text:line-break/><text:span text:style-name="T1"> </text:span><text:span text:style-name="T2">(145/12) </text:span> [ⲉⲡ]ϣⲓ̣ⲕ̣ ϩⲛ̅ⲟⲩⲕⲁⲣⲱϥ ⲙⲛ̅ⲟⲩⲉⲃⲣⲏ <text:line-break/><text:span text:style-name="T1"> </text:span><text:span text:style-name="T2">(145/13) </text:span> [ϭⲉ] ⲉϥϫ̣ⲡ̣ⲟ ⲥⲉⲛⲁⲩ ⲉⲣⲟϥ ⲏ͂ ⲥⲉϭⲙ̅‐ <text:line-break/><text:span text:style-name="T1"> </text:span><text:span text:style-name="T2">(145/14) </text:span> [ϭⲟⲙ] ⲉⲣⲟϥ· ⲁⲗⲗⲁ ⲛ̅ⲧⲱ̣ⲧ̣ⲛ̅ ⲛ̅ϩⲟⲩⲟ <text:line-break/><text:span text:style-name="T1"> </text:span><text:span text:style-name="T2">(145/15) </text:span> [ϣⲁⲧⲉ]ⲧ̣ⲛ̅ⲥⲟⲩⲱⲛ[ⲧⲉϩⲓ]ⲏ ⲧⲁⲉⲓ ⲉⲙ‐ <text:line-break/><text:span text:style-name="T1"> </text:span><text:span text:style-name="T2">(145/16) </text:span> [ⲡⲁⲧⲉⲁⲅ]̓[ⲅⲉ]ⲗ̣ⲟⲥ̣ ⲟⲩⲇ[ⲉ ⲉ]ⲝⲟⲩⲥⲓⲁ <text:line-break/><text:span text:style-name="T1"> </text:span><text:span text:style-name="T2">(145/17) </text:span> [....... ⲁ]ⲗ̣ⲗ̣ⲁ̣ ⲧⲁ̣ⲡ[ⲉⲓ]ⲱⲧ%6 ⲙⲛ̅ⲡϣⲏ‐ <text:line-break/><text:soft-page-break/><text:span text:style-name="T1"> </text:span><text:span text:style-name="T2">(145/18) </text:span> [ⲣⲉ ⲧ]ⲉ̣ ϫⲉ̣[ⲛ̅ⲧⲟⲟ]ⲩ ⲙ̅ⲡ̣[ⲉ]ⲥⲛⲁⲩ ⲟⲩⲁ ⲛ̅ <text:line-break/><text:span text:style-name="T1"> </text:span><text:span text:style-name="T2">(145/19) </text:span> [...] ⲛⲉ· ⲁ[ⲩⲱ] ⲧ̣ⲉⲧⲛ[ⲁ]ⲙ̣ⲟⲟϣⲉ ϩⲛ̅ <text:line-break/><text:span text:style-name="T1"> </text:span><text:span text:style-name="T2">(145/20) </text:span> [ⲧⲉϩⲓ]ⲏ̣ ⲉⲧⲁⲧⲉⲧⲛ̅ⲥⲟⲩ[ⲱⲛⲥ̅·] ⲕⲁⲛ ⲉ‐ <text:line-break/><text:span text:style-name="T1"> </text:span><text:span text:style-name="T2">(145/21) </text:span> [ϣ]ⲱ̣ⲡⲉ ⲛ̅ⲁⲣⲭⲱⲛ ⲉ[ⲩϣⲁ]ⲛⲣ̅ⲛⲟϭ <text:line-break/><text:span text:style-name="T1"> </text:span><text:span text:style-name="T2">(145/22) </text:span> [ⲥⲉ]ⲛ̣ⲁϣϫⲟⲟⲃⲥ ⲁⲛ ⲁⲗ̣[ⲗⲁ ⲉⲓ]ⲥ̣ϯ <text:line-break/><text:span text:style-name="T1"> </text:span><text:span text:style-name="T2">(145/23) </text:span> [ϫ]ⲱ̣ ⲙ̅ⲙⲟⲥ ⲛⲏⲧⲛ̅ ϫ̣[ⲉⲟⲩ]ⲃⲁⲣⲟⲥ <text:line-break/><text:span text:style-name="T1"> </text:span><text:span text:style-name="T2">(145/24) </text:span> [ⲛⲁⲓ̈] ϩ̣ⲱⲱⲧ̓ ⲟⲛ ⲧⲉ ⲉ̣[ϫⲟⲟ]ⲃ̣ⲉⲥ ⲡⲉ‐ <text:line-break/><text:span text:style-name="T1"> </text:span><text:span text:style-name="T2">(146/1) </text:span> ϫ̣ⲉ̣ [ⲙⲁⲣⲓϩⲁⲙ ⲙ̅ⲡϫⲟ]ⲉⲓⲥ ϫⲉ ϩⲟ‐ <text:line-break/><text:span text:style-name="T1"> </text:span><text:span text:style-name="T2">(146/2) </text:span> ⲧⲁⲛ ⲉ̣[ⲩ]ϣ̣[ⲁ{ⲛ}.....]. ⲛ̅ϭⲓⲛⲉϩ‐ <text:line-break/><text:span text:style-name="T1"> </text:span><text:span text:style-name="T2">(146/3) </text:span> ⲃⲏⲟⲩⲉ ⲟ[...... ⲉ]ⲧⲃⲱⲗ ⲉⲃⲟⲗ <text:line-break/><text:span text:style-name="T1"> </text:span><text:span text:style-name="T2">(146/4) </text:span> ⲛ̅ⲟⲩϩⲱ̣[. ⲡⲉϫⲉ ⲡϫⲟⲉ]ⲓ̣ⲥ̣ ϫⲉ ⲧⲉ‐ <text:line-break/><text:span text:style-name="T1"> </text:span><text:span text:style-name="T2">(146/5) </text:span> ⲥⲟⲟⲩⲛ ⲅ̣ⲁ̣[ⲣ .....].. ⲉ̣ⲉ̣ⲓ̣ϣⲁⲛ̣ <text:line-break/><text:span text:style-name="T1"> </text:span><text:span text:style-name="T2">(146/6) </text:span> ⲃⲱⲗ ⲉⲃⲟ[ⲗ ....]....ⲛⲁⲃⲱⲕ ⲉ‐ <text:line-break/><text:span text:style-name="T1"> </text:span><text:span text:style-name="T2">(146/7) </text:span> ⲡⲉϥⲧⲟⲡ[ⲟⲥ] ⲡⲉϫⲉ ⲓ̈ⲟⲩⲇⲁⲥ ϫⲉ ϩⲛ̅ <text:line-break/><text:span text:style-name="T1"> </text:span><text:span text:style-name="T2">(146/8) </text:span> ⲟⲩ ⲉϥⲟⲩⲟ̣ⲛϩ ⲉⲃⲟⲗ ⲛ̅ϭⲓⲡⲉ̣ⲡ̣̅̅ⲛ̣̅̅[̅ⲁ̅] <text:line-break/><text:span text:style-name="T1"> </text:span><text:span text:style-name="T2">(146/9) </text:span> ⲡⲉϫⲉ ⲡϫⲟⲉⲓⲥ ϫⲉ ϩⲛ̅ⲟⲩ [ⲉⲥⲟⲩⲟⲛϩ] <text:line-break/><text:span text:style-name="T1"> </text:span><text:span text:style-name="T2">(146/10) </text:span> ⲉⲃⲟⲗ ⲛ̅ϭⲓⲧⲥⲏϥⲉ ⲡⲉϫⲉ ⲓ̈ⲟ̣ⲩ̣ⲇ̣ⲁ̣[ⲥ] <text:line-break/><text:span text:style-name="T1"> </text:span><text:span text:style-name="T2">(146/11) </text:span> ϫⲉ ϩⲛ̅ⲟⲩ ⲉϥⲟⲩⲟⲛϩ ⲉⲃⲟⲗ ⲛ̅ϭⲓⲡⲟ̣[ⲩ]‐ <text:line-break/><text:span text:style-name="T1"> </text:span><text:span text:style-name="T2">(146/12) </text:span> ⲟⲉⲓⲛ· ⲡⲉϫⲉ ⲡϫⲟⲉⲓⲥ ϫⲉ ⲉ....[..] <text:line-break/><text:span text:style-name="T1"> </text:span><text:span text:style-name="T2">(146/13) </text:span> ⲛ̅ϩⲏⲧϥ̅ ⲛ̅ϣⲁⲉⲛⲉϩ· ⲡⲉϫ̣ⲉ̣ⲓ̣̈ⲟ̣ⲩⲇ[ⲁⲥ] <text:line-break/><text:span text:style-name="T1"> </text:span><text:span text:style-name="T2">(146/14) </text:span> ϫⲉⲛⲓⲙ ⲡⲉ ⲉⲧⲕⲱ ⲛ̅ⲛⲉϩⲃⲏⲟ̣[ⲩⲉ] <text:line-break/><text:span text:style-name="T1"> </text:span><text:span text:style-name="T2">(146/15) </text:span> ⲛ̅ⲛⲓⲙ ⲉⲃⲟⲗ̣ [ⲛⲉϩ]ⲃ̣ⲏⲟⲩⲉ ⲉⲧⲕ[..] <text:line-break/><text:span text:style-name="T1"> </text:span><text:span text:style-name="T2">(146/16) </text:span> ⲡⲕⲟⲥⲙⲟⲥ [.]..........[..ⲉ] <text:line-break/><text:span text:style-name="T1"> </text:span><text:span text:style-name="T2">(146/17) </text:span> ⲧⲕⲱ ⲛ̅ⲛⲉϩ[ⲃ]ⲏ̣ⲟⲩⲉ ⲉⲃⲟ̣[ⲗ· ⲡⲉϫⲉ] <text:line-break/><text:span text:style-name="T1"> </text:span><text:span text:style-name="T2">(146/18) </text:span> ⲡϫⲟⲉⲓⲥ ϫⲉ̣ [ⲛ]ⲓⲙ ⲡ[ⲉ ...]ⲉⲡ̣ⲉ̣[ⲛ] <text:line-break/><text:span text:style-name="T1"> </text:span><text:span text:style-name="T2">(146/19) </text:span> ⲧⲁϩⲉⲓⲙⲉ ⲉⲛ[ⲉ]ϩ̣ⲃⲏⲟ̣[ⲩⲉ] ⲡ̣ⲱϥ ⲡ̣[ⲉ ⲉ] <text:line-break/><text:span text:style-name="T1"> </text:span><text:span text:style-name="T2">(146/20) </text:span> ⲉⲓⲣⲉ ⲛ̅ⲡ̣[ⲟⲩⲱ]ϣⲉ ⲙ̣̅ⲡⲉⲓⲱⲧ· ⲛ̅[ⲧⲱ]‐ <text:line-break/><text:span text:style-name="T1"> </text:span><text:span text:style-name="T2">(146/21) </text:span> ⲧⲛ̅ ⲇⲉ ⲁⲣ[ⲓⲁⲅⲱ]ⲛⲓⲍⲉ ⲉϥⲓ ⲛ̅ⲧⲟ[ⲣⲅⲏ] <text:line-break/><text:span text:style-name="T1"> </text:span><text:span text:style-name="T2">(146/22) </text:span> ⲙⲛ̅ⲡⲉ[ⲫⲑⲟ]ⲛⲟⲥ ⲉⲃⲟⲗ ϩⲛ̅ⲧⲏⲛⲟ̣[ⲩ] <text:line-break/><text:span text:style-name="T1"> </text:span><text:span text:style-name="T2">(146/23) </text:span> ⲁⲩⲱ ⲛ̅ⲧ[ⲉⲧⲛ̅]ⲕ̣ⲱ ⲙ̅ⲙⲱⲧⲛ̅ ⲕⲁϩⲏ̣[ⲟⲩ] <text:line-break/><text:span text:style-name="T1"> </text:span><text:span text:style-name="T2">(146/24) </text:span> ⲛ̅ⲛⲉⲧⲛ̅[....].ⲉ· ⲛ̅ⲧⲉⲧⲛ̅ⲧⲙ̅.[..] <text:line-break/><text:span text:style-name="T1"> </text:span><text:span text:style-name="T2">(147/1) </text:span> (APPROXIMATELY 7 LINES ARE MISSING.) <text:line-break/><text:span text:style-name="T1"> </text:span><text:span text:style-name="T2">(147/2) </text:span> [ ]. <text:line-break/><text:span text:style-name="T1"> </text:span><text:span text:style-name="T2">(147/3) </text:span> [ ]ⲛⲉ <text:line-break/><text:span text:style-name="T1"> </text:span><text:span text:style-name="T2">(147/4) </text:span> [ ]ⲱⲇⲉ <text:line-break/><text:span text:style-name="T1"> </text:span><text:span text:style-name="T2">(147/5) </text:span> [ ]ⲉ̣..ϯⲡⲉ <text:line-break/><text:span text:style-name="T1"> </text:span><text:span text:style-name="T2">(147/6) </text:span> [ ].ⲙⲛ̅ⲧⲣⲉϥ <text:line-break/><text:span text:style-name="T1"> </text:span><text:span text:style-name="T2">(147/7) </text:span> [ ].ⲁⲛⲟϭⲛⲉϭ <text:line-break/><text:span text:style-name="T1"> </text:span><text:span text:style-name="T2">(147/8) </text:span> [ ]ϯϫⲱ ⲅⲁⲣ ⲙ̅ <text:line-break/><text:span text:style-name="T1"> </text:span><text:span text:style-name="T2">(147/9) </text:span> [ ]ⲉ̣ⲧ̣ⲛ̅ϫⲓ ⲛ̅ϩⲉⲛ <text:line-break/><text:span text:style-name="T1"> </text:span><text:span text:style-name="T2">(147/10) </text:span> [ ]ⲧⲏⲧⲛ̅ϩⲁϩⲟⲩ <text:line-break/><text:span text:style-name="T1"> </text:span><text:span text:style-name="T2">(147/11) </text:span> [ ]ⲧⲁϥϣⲓⲛⲉ ⲉⲁϥ <text:line-break/><text:span text:style-name="T1"> </text:span><text:span text:style-name="T2">(147/12) </text:span> [ ].ⲉⲡⲁ̣ⲓ̈ ⲛⲁⲙ̅ <text:line-break/><text:span text:style-name="T1"> </text:span><text:span text:style-name="T2">(147/13) </text:span> [ ]ϥⲛⲁⲱⲛϩ ϣⲁ <text:line-break/><text:span text:style-name="T1"> </text:span><text:span text:style-name="T2">(147/14) </text:span> [.........].ⲉϯϫⲱ ⲙ̅ⲙⲟⲥ ⲛⲏ <text:line-break/><text:span text:style-name="T1"> </text:span><text:span text:style-name="T2">(147/15) </text:span> [ⲧⲛ̅ .....].ⲉϫⲉ ⲛ̅ⲛⲉⲧⲛ̅ⲥⲱⲣⲙ̅ <text:line-break/><text:soft-page-break/><text:span text:style-name="T1"> </text:span><text:span text:style-name="T2">(147/16) </text:span> [ⲛ̅ⲛⲉⲧⲙ̅]ⲡ̣̅̅ⲛ̅ⲁ̅ ⲙⲛ̅ⲛⲉⲧⲙ̅ⲯⲩⲭⲟⲟⲩⲉ <text:line-break/><text:span text:style-name="T1"> </text:span><text:span text:style-name="T2">(147/17) </text:span> [ⲡⲇⲓⲁⲗⲟ]ⲅⲟⲥ ⲙ̅ⲡⲥⲱⲧⲏⲣ·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39:56.706476200</meta:creation-date>
    <meta:generator>LibreOffice/26.2.1.2$Windows_X86_64 LibreOffice_project/620$Build-2</meta:generator>
    <dc:date>2026-03-24T12:44:09.217021200</dc:date>
    <meta:editing-duration>PT4M12S</meta:editing-duration>
    <meta:editing-cycles>1</meta:editing-cycles>
    <meta:document-statistic meta:table-count="0" meta:image-count="0" meta:object-count="0" meta:page-count="70" meta:paragraph-count="10" meta:word-count="17318" meta:character-count="121873" meta:non-whitespace-character-count="95018"/>
  </office:meta>
</office:document-meta>
</file>