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style:font-name="Antinoou" fo:font-size="11pt" officeooo:rsid="000540ec" officeooo:paragraph-rsid="00052258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ntinoou" fo:font-size="11pt" officeooo:rsid="000540ec" officeooo:paragraph-rsid="00052258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ntinoou" fo:font-size="11pt" officeooo:rsid="00062937" officeooo:paragraph-rsid="00052258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style:font-name="Antinoou" fo:font-size="11pt" officeooo:rsid="00062937" officeooo:paragraph-rsid="00052258" style:font-size-asian="11pt" style:font-size-complex="11pt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II ) The Apocryphon of John</text:p>
      <text:p text:style-name="P2"><text:span text:style-name="T1"> </text:span><text:span text:style-name="T2">(1/1) </text:span> ⲧⲉⲥⲃⲱ [ⲛ̅ⲧⲉ ⲡⲥⲱⲧⲏⲣ ⲁⲩⲱ] ⲡ̣ϭ̣[ⲱⲗ]ⲡ ⲉ‐ <text:line-break/><text:span text:style-name="T1"> </text:span><text:span text:style-name="T2">(1/2) </text:span> ⲃⲟⲗ ⲛⲙ̣ⲙ̣̅[ⲩⲥⲧⲏⲣⲓⲟⲛ ⲙⲛ̅ ⲛⲉ]ⲧϩⲏⲡ ϩⲛ̅ ⲟⲩ‐ <text:line-break/><text:span text:style-name="T1"> </text:span><text:span text:style-name="T2">(1/3) </text:span> ⲙⲛ̅ⲧ̅ⲕⲁⲣⲱϥ ⲙ̣[ⲛ̣̅ ⲛⲁⲓ̈ ⲉ]ⲛ̣ⲧ̣ⲁ̣ϥⲧⲥⲉⲃⲟⲟⲩ <text:line-break/><text:span text:style-name="T1"> </text:span><text:span text:style-name="T2">(1/4) </text:span> ⲁⲓ̈ⲱϩⲁⲛⲛ[ⲏⲥ ⲡⲉϥⲙⲁ]ⲑⲏⲧⲏⲥ <text:line-break/><text:span text:style-name="T1"> </text:span><text:span text:style-name="T2">(1/5) </text:span> ⲁⲥϣⲱⲡⲉ̣ [ⲇⲉ] ⲛ̣̅ⲟⲩ[ϩⲟ]ⲟⲩ ⲛ̅ⲧⲁⲣⲉϥⲉⲓ ⲉϩ‐ <text:line-break/><text:span text:style-name="T1"> </text:span><text:span text:style-name="T2">(1/6) </text:span> ⲣⲁⲓ̈ ⲛ̅ϭⲓ ⲓ̈ⲱ[ϩⲁⲛⲛ]ⲏⲥ [ⲡⲥⲟⲛ] ⲛ̅ⲓⲁⲕⲱⲃⲟⲥ ⲉⲧⲉ <text:line-break/><text:span text:style-name="T1"> </text:span><text:span text:style-name="T2">(1/7) </text:span> ⲛⲁⲓ̈ ⲛⲉ ⲛ̅ϣⲏ[ⲣⲉ] ⲛ̣̅ⲍⲉ[ⲃⲉⲇ]ⲁⲓⲟⲥ ⲁϥⲉⲓ ⲉϩⲣⲁⲓ̈ ⲉ‐ <text:line-break/><text:span text:style-name="T1"> </text:span><text:span text:style-name="T2">(1/8) </text:span> ⲡⲉⲣⲡⲉ ⲁϥϯ ⲡⲉϥⲟ̣[ⲩⲟ]ⲉⲓ ⲉⲣⲟϥ’ ⲛ̅ϭⲓ ⲟⲩ[ⲫⲁ]ⲣ̣ⲓ̣‐ <text:line-break/><text:span text:style-name="T1"> </text:span><text:span text:style-name="T2">(1/9) </text:span> ⲥⲁⲓⲟⲥ ⲉⲡⲉϥⲣⲁⲛ ⲡ̣[ⲉ ϫⲉ] ⲁⲣⲓⲙⲁⲛⲓⲟⲥ ⲁⲩ[ⲱ] <text:line-break/><text:span text:style-name="T1"> </text:span><text:span text:style-name="T2">(1/10) </text:span> ⲡⲉϫⲁϥ ⲛⲁϥ ϫⲉ ⲉϥ̣ⲧⲱⲛ ⲡⲉⲕⲥⲁϩ ⲡⲁⲓ̈ ⲉ̣[ⲧⲁ]‐ <text:line-break/><text:span text:style-name="T1"> </text:span><text:span text:style-name="T2">(1/11) </text:span> ⲕⲟⲩⲏϩ ⲛ̅ⲥⲱϥ ⲁⲩⲱ ⲡ[ⲉϫⲁ]ϥ̣ ⲛⲁ̣ϥ̣ [ϫ]ⲉ ⲡⲙ̣[ⲁ ⲉ]‐ <text:line-break/><text:span text:style-name="T1"> </text:span><text:span text:style-name="T2">(1/12) </text:span> ⲧⲁϥⲉⲓ ⲛ̅ϩⲏⲧϥ ⲁϥⲃⲱ̣[ⲕ ⲉⲣⲟϥ ⲡⲉϫⲁϥ ⲛⲁϥ’] <text:line-break/><text:span text:style-name="T1"> </text:span><text:span text:style-name="T2">(1/13) </text:span> ⲛ̅ϫⲉ ⲡⲉⲫⲁⲣⲓⲥⲁⲓⲟⲥ̣ [ϫⲉ ϩⲛ̅ ⲟⲩⲡⲗⲁⲛⲏ ⲁϥⲣ̅]‐ <text:line-break/><text:span text:style-name="T1"> </text:span><text:span text:style-name="T2">(1/14) </text:span> ⲡⲗⲁⲛⲁ ⲙ̅ⲙⲱⲧ̣[ⲛ̅] ⲛ̅ϭ̣[ⲓ ⲡⲉⲓ̈ⲛⲁⲍⲱⲣⲁⲓⲟⲥ] <text:line-break/><text:span text:style-name="T1"> </text:span><text:span text:style-name="T2">(1/15) </text:span> ⲁⲩⲱ ⲁϥⲙⲁϩ̣ [ⲛⲉⲧⲛ̅ⲙⲁⲁϫⲉ ⲛ̅ϩⲉⲛϭⲟⲗ] <text:line-break/><text:span text:style-name="T1"> </text:span><text:span text:style-name="T2">(1/16) </text:span> ⲁⲩⲱ ⲁϥⲧⲱⲙ ⲛ̣̅[ⲛⲉⲧⲛ̅ϩⲏⲧ ⲁϥⲕⲧⲱⲧⲛ̅ ⲉ]‐ <text:line-break/><text:span text:style-name="T1"> </text:span><text:span text:style-name="T2">(1/17) </text:span> ⲃⲟⲗ’ ⲛ̣̅ⲙ̅ⲡⲁⲣⲁⲇ[ⲟⲥⲓⲥ ⲛ̅ⲛⲉⲧⲛ̅ⲉⲓⲟⲧⲉ ⲛ̅ⲧⲁⲣⲓ]‐ <text:line-break/><text:span text:style-name="T1"> </text:span><text:span text:style-name="T2">(1/18) </text:span> ⲥⲱ[ⲧⲙ̅] ⲉⲛⲁⲓ̈ ⲁⲛ[ⲟⲕ ⲓ̈ⲱϩⲁⲛⲛⲏⲥ ⲁⲓ̈ⲕⲱⲧⲉ] <text:line-break/><text:span text:style-name="T1"> </text:span><text:span text:style-name="T2">(1/19) </text:span> ⲉⲃ[ⲟ]ⲗ̣ ϩ̣ⲙ̅ ⲡⲉⲣⲡ̣[ⲉ ⲉϩⲣⲁⲓ̈ ⲉϫⲛ̅ ⲟⲩⲙⲁ ⲛ̅ϫⲁⲉⲓⲉ] <text:line-break/><text:span text:style-name="T1"> </text:span><text:span text:style-name="T2">(1/20) </text:span> ⲁ̣ⲩⲱ ⲁⲓ̈ⲣ̅ⲗⲩ̣ⲡⲉ̣[ⲓ ⲛ̅ϩⲟⲩⲟ ϩⲙ̅ ⲡⲁϩⲏⲧ ⲉⲓ̈ϫⲱ] <text:line-break/><text:span text:style-name="T1"> </text:span><text:span text:style-name="T2">(1/21) </text:span> ⲙ̅]ⲙ̣ⲟⲥ ⲉⲧ̣ⲃⲉ [ⲑⲉ ⲉⲧⲁⲩⲡⲱϣⲛ ⲙ̅ⲡⲥⲱⲧⲏⲣ] <text:line-break/><text:span text:style-name="T1"> </text:span><text:span text:style-name="T2">(1/22) </text:span> ⲁⲩⲱ ϫⲉ ⲉⲧⲃⲉ̣[ⲟⲩ ⲁⲩⲧⲛ̅ⲛⲟⲟⲩϥ ⲉⲡⲕⲟⲥⲙⲟⲥ] <text:line-break/><text:span text:style-name="T1"> </text:span><text:span text:style-name="T2">(1/23) </text:span> ⲉⲃⲟⲗ ϩⲓⲧⲛ̅ ⲡⲉ[ϥⲉⲓⲱⲧ ⲁⲩⲱ ⲛⲓⲙ ⲡⲉ ⲡⲉϥ]‐ <text:line-break/><text:span text:style-name="T1"> </text:span><text:span text:style-name="T2">(1/24) </text:span> ⲉⲓⲱⲧ ⲉⲧⲁϩⲧ̣[ⲛ̅ⲛⲟⲟⲩϥ ⲁⲩⲱ ⲟⲩⲁϣ ⲛ̅ϩⲉ] <text:line-break/><text:span text:style-name="T1"> </text:span><text:span text:style-name="T2">(1/25) </text:span> ⲡⲉ ⲡⲁⲓⲱⲛ ⲉ[ⲧⲙ̅ⲙⲁⲩ ⲡⲉⲧⲛ̅ⲛⲁⲃⲱⲕ ⲉⲣⲟϥ] <text:line-break/><text:span text:style-name="T1"> </text:span><text:span text:style-name="T2">(1/26) </text:span> ⲟⲩ ⲅⲁⲣ ⲉϥϣ[ⲁϫⲉ ⲉⲧⲃⲏⲧϥ ⲁϥϫⲟⲟⲩ ⲁⲛ] <text:line-break/><text:span text:style-name="T1"> </text:span><text:span text:style-name="T2">(1/27) </text:span> ϫⲉ ⲡⲓⲁⲓⲱⲛ ⲉⲧ̣[ⲛ̅ⲛⲁⲃⲱⲕ ⲉⲣⲟϥ ⲁϥϫⲓ ⲧⲩ]‐ <text:line-break/><text:span text:style-name="T1"> </text:span><text:span text:style-name="T2">(1/28) </text:span> ⲡⲟⲥ ⲙ̅ⲡⲁⲓⲱⲛ ⲛ̣̅[ⲁⲧⲧⲉⲕⲟ ⲁⲩⲱ ⲙ̅ⲡⲉϥⲧⲥⲉ]‐ <text:line-break/><text:span text:style-name="T1"> </text:span><text:span text:style-name="T2">(1/29) </text:span> ⲃⲟⲛ ⲉⲧⲃ[ⲉ ⲡⲉ]ⲧⲙ̣̅ⲙⲁⲩ ϫⲉ ⲟⲩⲁϣ ⲛ̅ϩⲉ ⲡⲉ] <text:line-break/><text:span text:style-name="T1"> </text:span><text:span text:style-name="T2">(1/30) </text:span> ϩⲛ̅ ⲧⲟⲩⲛ[ⲟⲩ ⲛ̅ⲧⲁⲣⲓⲙⲉⲉⲩⲉ ⲉⲛⲁⲓ̈ ⲉⲓⲥϩⲏ]‐ <text:line-break/><text:span text:style-name="T1"> </text:span><text:span text:style-name="T2">(1/31) </text:span> ⲏⲧⲉ ⲁⲙ[ⲡⲏⲩⲉ ⲟⲩⲱⲛ ⲉⲃⲟⲗ ⲁⲩⲱ ⲛⲉⲥⲟ] <text:line-break/><text:span text:style-name="T1"> </text:span><text:span text:style-name="T2">(1/32) </text:span> ⲛ̅ⲟⲩⲟⲉⲓⲛ̣ [ⲛ̅ϭⲓ] ⲧ̣ⲕⲧⲓ̣ⲥ̣[ⲓⲥ ⲧⲏⲣⲥ ⲉⲧⲙ̅ⲡⲥⲁ] <text:line-break/><text:span text:style-name="T1"> </text:span><text:span text:style-name="T2">(1/33) </text:span> ⲙ̅ⲡⲓⲧⲛ̅ ⲛ̅ⲧ̣ⲡⲉ ⲁⲩⲱ ⲁϥⲕⲓⲙ [ⲛ̅ϭⲓ̣ ⲡⲕⲟⲥ]‐ <text:line-break/><text:span text:style-name="T1"> </text:span><text:span text:style-name="T2">(1/34) </text:span> [ⲙⲟⲥ] <text:line-break/><text:span text:style-name="T1"> </text:span><text:span text:style-name="T2">(2/1) </text:span> ⲁ[ⲓ̈ⲣ ϩⲟⲧⲉ ⲁⲩⲱ ⲉⲓⲥϩⲏⲏⲧⲉ ⲁⲓ̈]ⲛⲁⲩ ϩⲣⲁⲓ̈ ϩⲙ̅ <text:line-break/><text:span text:style-name="T1"> </text:span><text:span text:style-name="T2">(2/2) </text:span> ⲡⲟⲩ̣ⲟⲉ̣ⲓ̣ⲛ̣ [ⲉⲩⲁⲗⲟⲩ ⲉⲧⲁϩⲁϩⲉ] ⲉ̣ⲣⲁⲧϥ ⲛⲁⲓ̈ <text:line-break/><text:span text:style-name="T1"> </text:span><text:span text:style-name="T2">(2/3) </text:span> ⲛ̅ⲧⲁⲣⲓⲛⲁ[ⲩ ⲉⲣⲟϥ ⲁϥϣⲱⲡ]ⲉ̣ ⲉϥⲟ ⲛ̅ⲑⲉ ⲛ̅ⲟⲩ‐ <text:line-break/><text:span text:style-name="T1"> </text:span><text:span text:style-name="T2">(2/4) </text:span> ⲛⲟϭ ⲁⲩⲱ ⲛⲁϥⲕ̣ⲱ̣[ⲧⲉ ⲙ̅ⲡⲉ]ϥ̣ⲥⲙⲁⲧ ⲉϥⲟ ⲛ̅ⲑⲉ <text:line-break/><text:span text:style-name="T1"> </text:span><text:span text:style-name="T2">(2/5) </text:span> ⲛ̅ⲟⲩϩ̣ⲁ̣ⲗ ⲛ̅ⲛⲁⲩ[ⲟ ⲛ̅ϩⲁϩ ⲁⲛ ⲙ̅]ⲡⲁⲙ̅ⲧ̣ⲟ ⲉⲃⲟⲗ <text:line-break/><text:span text:style-name="T1"> </text:span><text:span text:style-name="T2">(2/6) </text:span> ⲁⲩⲱ ⲛⲉⲟⲩⲛ ⲟ[ⲩⲉⲓ]ⲛ̣ⲉ ⲉ̣[ϥⲟ ⲛ̅]ϩⲁϩ ⲙ̅ⲙⲟⲣⲫⲏ <text:line-break/><text:span text:style-name="T1"> </text:span><text:span text:style-name="T2">(2/7) </text:span> ϩⲣⲁⲓ̈ ϩⲙ̅ ⲡⲟⲩⲟ̣[ⲉⲓⲛ] ⲁ̣ⲩⲱ ⲛ̣[ⲓⲥⲙⲁⲧ] ⲛⲁⲩⲟⲩⲟⲛϩ <text:line-break/><text:span text:style-name="T1"> </text:span><text:span text:style-name="T2">(2/8) </text:span> ϩⲓⲧⲛ̅ ⲛⲉⲩⲉⲣⲏ̣ⲩ̣ ⲁ[ⲩⲱ] ⲡⲉ̣[ⲥⲙⲁ]ⲧ’· ⲛⲁϥⲟ ⲛ̅ϣⲟ[ⲙ]‐ <text:line-break/><text:span text:style-name="T1"> </text:span><text:span text:style-name="T2">(2/9) </text:span> ⲧ[ⲉ] ⲙ̅ⲙⲟⲣⲫⲏ ⲡⲉϫ̣[ⲁϥ] ⲛⲁⲓ̈ ϫ̣ⲉ̣ ⲓ̣̈ⲱϩⲁⲛⲛⲏ· ⲓ̈ⲱ‐ <text:line-break/><text:span text:style-name="T1"> </text:span><text:span text:style-name="T2">(2/10) </text:span> [ϩⲁⲛ]ⲛⲏ· ⲉⲧⲃⲉ ⲟⲩ̣[ⲕⲣ̅ⲇⲓ]ⲥⲧⲁⲍⲉ ⲏ ⲉⲧⲃⲉ ⲟⲩ <text:line-break/><text:span text:style-name="T1"> </text:span><text:span text:style-name="T2">(2/11) </text:span> [ⲕⲟ] ⲛ̅ϩⲟⲧⲉ ⲙⲏ ⲛ̅[ⲧⲕ] ⲟ̣ⲩϣⲙ̅ⲙⲟ ⲁϯⲉⲓⲇⲉⲁ̣ <text:line-break/><text:span text:style-name="T1"> </text:span><text:span text:style-name="T2">(2/12) </text:span> [ⲉ]ⲧ̣ⲉ ⲧⲁⲓ̈ ⲧⲉ ⲙ̅ⲡ[ⲉⲣⲣ̅ ϩ]ⲏ̣ⲧ ϣⲏⲙ ⲁⲛⲟⲕ ⲡⲉⲧ‐ <text:line-break/><text:soft-page-break/><text:span text:style-name="T1"> </text:span><text:span text:style-name="T2">(2/13) </text:span> [ϣⲟⲟⲡ ⲛⲙ̅ⲙⲏⲧⲏⲩⲧⲛ̅] ⲛ̅ⲟⲩⲟⲉⲓϣ ⲛⲓⲙ ⲁⲛⲟⲕ <text:line-break/><text:span text:style-name="T1"> </text:span><text:span text:style-name="T2">(2/14) </text:span> [ⲡⲉ ⲡⲉⲓⲱⲧ ⲁⲛⲟⲕ ⲡⲉ] ⲧⲙⲁⲁⲩ· ⲁⲛⲟⲕ ⲡⲉ ⲡϣⲏ‐ <text:line-break/><text:span text:style-name="T1"> </text:span><text:span text:style-name="T2">(2/15) </text:span> [ⲣⲉ· ⲁⲛⲟⲕ ⲡⲉ ⲡⲓⲁⲧ]ⲧ̣ⲱⲗⲙ ⲁⲩⲱ ⲡⲓⲁⲧϫⲱϩⲙ̣ <text:line-break/><text:span text:style-name="T1"> </text:span><text:span text:style-name="T2">(2/16) </text:span> [ⲧⲉⲛⲟⲩ ⲁⲓ̈ⲉⲓ ⲉⲧⲥⲉⲃ]ⲟ̣ⲕ̣ [ϫ]ⲉ ⲟⲩ ⲡⲉⲧϣⲟⲟⲡ <text:line-break/><text:span text:style-name="T1"> </text:span><text:span text:style-name="T2">(2/17) </text:span> [ⲁⲩⲱ̣ ⲟⲩ ⲡⲉⲧⲁϩϣⲱⲡⲉ ⲁⲩ]ⲱ̣ [ⲟ]ⲩ ⲡⲉⲧϣⲉ ⲉ‐ <text:line-break/><text:span text:style-name="T1"> </text:span><text:span text:style-name="T2">(2/18) </text:span> [ϣⲱⲡⲉ ϫⲉⲕⲁⲁⲥ ⲉⲕⲛⲁⲙ̅ⲙⲉ ⲉⲛ]ⲉ̣ⲧⲉ ⲛ̅ⲥⲉⲟⲩⲟ[ⲛϩ] <text:line-break/><text:span text:style-name="T1"> </text:span><text:span text:style-name="T2">(2/19) </text:span> [ⲁⲛ ⲙⲛ̅ ⲛⲉⲧⲟⲩⲟⲛϩ ⲁⲩⲱ ⲉⲧⲥⲉⲃⲟ]ⲕ̣’ ⲉⲧⲅ̣ⲉ̣[ⲛⲉⲁ] <text:line-break/><text:span text:style-name="T1"> </text:span><text:span text:style-name="T2">(2/20) </text:span> [ⲛ̅ⲁⲧⲕⲓⲙ ⲛ̅ⲧⲉ ⲡⲓⲧⲉⲗⲓⲟⲥ ⲛ̅ⲣⲱⲙⲉ ⲧ]ⲉ̣ⲛⲟⲩ‐ <text:line-break/><text:span text:style-name="T1"> </text:span><text:span text:style-name="T2">(2/21) </text:span> [ϭⲉ ϥⲓ ⲙ̅ⲡⲉⲕϩⲟ ⲉϩⲣⲁⲓ̈ ⲉⲃⲟⲗ ϫⲉⲕⲁⲁ]ⲥ ⲉⲕⲛⲁ‐ <text:line-break/><text:span text:style-name="T1"> </text:span><text:span text:style-name="T2">(2/22) </text:span> [ϫⲓ ⲛ̅ⲛⲉϯⲛⲁⲧⲥⲉⲃⲟⲟⲩ ⲉⲣⲟⲕ ⲙ̅]ⲡⲟⲟⲩ̣ [ⲁ]ⲩ̣[ⲱ] <text:line-break/><text:span text:style-name="T1"> </text:span><text:span text:style-name="T2">(2/23) </text:span> [ⲛ̅ⲕⲧⲁⲩⲟⲩ ⲛ̅ⲛⲉⲕϣ̅ⲃ̅ⲣ̅ⲡ̅]̅̅̅ⲛ̣̅̅ⲁ̅ ⲛⲁⲓ̈ ⲉⲧϣ̣[ⲟⲟ]ⲡ̣ <text:line-break/><text:span text:style-name="T1"> </text:span><text:span text:style-name="T2">(2/24) </text:span> [ⲉⲃⲟⲗ ϩⲛ̅ ⲧⲅⲉⲛⲉⲁ ⲛ̅ⲁⲧⲕⲓⲙ] ⲛ̅ⲧⲉ̣ ⲡⲓⲧⲉⲗⲓⲟⲥ̣ <text:line-break/><text:span text:style-name="T1"> </text:span><text:span text:style-name="T2">(2/25) </text:span> [ⲛ̅ⲣⲱⲙⲉ ⲁⲩⲱ ⲁⲛⲟⲕ ⲁⲓ̈ϫⲛ]ⲟⲩⲥ ϫⲉⲕⲁⲁⲥ ⲉⲓ̈[ⲛⲁ]‐ <text:line-break/><text:span text:style-name="T1"> </text:span><text:span text:style-name="T2">(2/26) </text:span> [ⲙ̅ⲙⲉ ⲉⲣⲟⲥ ⲁⲩⲱ ⲡⲉϫⲁϥ] ⲛⲁⲉⲓ ϫⲉ ⲧⲙ[ⲟ]ⲛⲁⲥ <text:line-break/><text:span text:style-name="T1"> </text:span><text:span text:style-name="T2">(2/27) </text:span> [ⲟⲩⲙⲟⲛⲁⲣⲭⲓⲁ ⲧⲉ ⲉⲙⲛ̅] ⲡⲉⲧϣⲟⲟⲡ ϩⲓϫⲱⲥ <text:line-break/><text:span text:style-name="T1"> </text:span><text:span text:style-name="T2">(2/28) </text:span> [ⲡⲁⲓ̈ ⲉⲧϣⲟⲟⲡ ⲛ̅ⲛⲟⲩⲧ]ⲉ̣ ⲁⲩⲱ ⲛ̅ⲉⲓⲱⲧ ⲙ̅ⲡ‐ <text:line-break/><text:span text:style-name="T1"> </text:span><text:span text:style-name="T2">(2/29) </text:span> [ⲧⲏⲣϥ ⲡⲉ ⲡⲓⲁϩⲟⲣⲁⲧ]ⲟⲥ ⲉⲧϣⲟⲟⲡ ϩⲓϫⲛ̅ <text:line-break/><text:span text:style-name="T1"> </text:span><text:span text:style-name="T2">(2/30) </text:span> [ⲡⲧⲏⲣϥ ⲉϥϣⲟⲟⲡ ⲛ̅]ⲧⲙ̅ⲛ̣̅̅ⲧ̅ⲁⲧⲧⲉⲕⲟ ⲉⲧϣⲟ‐ <text:line-break/><text:span text:style-name="T1"> </text:span><text:span text:style-name="T2">(2/31) </text:span> [ⲟⲡ ⲙ̅ⲡⲟⲩⲟⲉⲓⲛ̣ ⲉⲧⲧⲃ̅ⲃⲏⲩ] ⲡⲁⲓ̈ ⲉⲧⲉ ⲙⲛ̅ <text:line-break/><text:span text:style-name="T1"> </text:span><text:span text:style-name="T2">(2/32) </text:span> [ϣϭⲟⲙ ⲛ̅ⲗⲁⲁⲩ ⲛ̅ⲃⲁⲗ ⲉϭⲱ]ϣ̣ⲧ ⲛ̅ⲥⲱϥ ⲛ̅‐ <text:line-break/><text:span text:style-name="T1"> </text:span><text:span text:style-name="T2">(2/33) </text:span> [ⲧⲟϥ ⲡⲉ ⲡⲉⲡ̅ⲛ̅ⲁ̅] ⲛ̣̅ⲁ̣[ϩⲟⲣⲁⲧ]ⲟ̣ⲛ ⲛ̅ⲥϣⲉ ⲁⲛ <text:line-break/><text:span text:style-name="T1"> </text:span><text:span text:style-name="T2">(2/34) </text:span> [ⲉⲙⲉⲉⲩⲉ ⲉ]ⲣ̣[ⲟ]ϥ ⲛ̅ⲑⲉ ⲛ̅ⲛ̣[ⲓⲛⲟ]ⲩⲧⲉ ⲏ ϫⲉ ⲉϥⲟ] <text:line-break/><text:span text:style-name="T1"> </text:span><text:span text:style-name="T2">(2/35) </text:span> [ⲛ̅ⲧⲉⲓϩ]ⲉ ⲛ̅ⲧⲟϥ ⲅⲁⲣ ⲟⲩϩⲟⲩⲟ ⲁⲛⲟⲩⲧⲉ <text:line-break/><text:span text:style-name="T1"> </text:span><text:span text:style-name="T2">(2/36) </text:span> [ⲡⲉ ⲉⲙⲛ̅ ⲡ]ⲉⲧϣⲟⲟⲡ ϩⲓϫⲱϥ ⲙⲛ̅ ⲗⲁⲁⲩ ⲅⲁⲣ <text:line-break/><text:span text:style-name="T1"> </text:span><text:span text:style-name="T2">(3/1) </text:span> ⲟ ⲛ̅ϫⲟⲉⲓⲥ [ⲉⲣⲟϥ ϥϣⲟⲟⲡ ⲅⲁⲣ] ⲁ̣ⲛ ϩⲛ̅ ⲗ[ⲁ]ⲁ̣ⲩ <text:line-break/><text:span text:style-name="T1"> </text:span><text:span text:style-name="T2">(3/2) </text:span> ⲛ̅ϭⲱϫⲃ̣’[ⲉⲣⲟϥ ⲉⲣⲉⲡⲧⲏⲣϥ ϣ]ⲟ̣ⲟⲡ ⲛ̅ϩⲏⲧϥ <text:line-break/><text:span text:style-name="T1"> </text:span><text:span text:style-name="T2">(3/3) </text:span> (blank) <text:line-break/><text:span text:style-name="T1"> </text:span><text:span text:style-name="T2">(3/4) </text:span> ⲟⲩⲁⲁⲧϥ̣ [ⲛ̅ⲧⲟϥ ⲟⲩϣⲁ ⲉⲛⲉϩ ⲡ]ⲉ ⲉⲃⲟⲗ ϫⲉ <text:line-break/><text:span text:style-name="T1"> </text:span><text:span text:style-name="T2">(3/5) </text:span> ϥⲣ̅ ⲭⲣⲉⲓ̣[ⲁ ⲛ̅ⲗⲁⲁⲩ ⲁⲛ ⲛ̅ⲧⲟϥ ⲅ]ⲁ̣ⲣ ⲟⲩϫⲱⲕ ⲧⲏⲣϥ <text:line-break/><text:span text:style-name="T1"> </text:span><text:span text:style-name="T2">(3/6) </text:span> ⲡⲉ ⲙ̅ⲡⲉ[ϥϣⲱⲱⲧ ⲛ̅ⲗⲁⲁⲩ ϫⲉ]ⲕⲁⲁⲥ ⲉϥⲛⲁ <text:line-break/><text:span text:style-name="T1"> </text:span><text:span text:style-name="T2">(3/7) </text:span> ϫⲱⲕ’ ⲛ̅ϩⲏ[ⲧϥ ⲁⲗⲗⲁ ⲛ̅ⲟⲩⲟ]ⲉ̣ⲓϣ ⲛⲓⲙ ⲉϥϫⲏⲕ <text:line-break/><text:span text:style-name="T1"> </text:span><text:span text:style-name="T2">(3/8) </text:span> ⲧⲏⲣϥ ϩⲛ̅ ⲟ̣[ⲩⲟⲉⲓⲛ ⲟⲩⲁⲧϯ ⲧⲟ]ϣϥ ⲡⲉ ⲉⲃⲟⲗ <text:line-break/><text:span text:style-name="T1"> </text:span><text:span text:style-name="T2">(3/9) </text:span> ϫⲉ ⲙⲛ̅ ⲡⲉ̣[ⲧϩⲁⲧⲉϥϩⲏ ⲁⲧ]ⲣ̣ⲉϥϯ ⲧⲱϣ ⲉⲣⲟϥ <text:line-break/><text:span text:style-name="T1"> </text:span><text:span text:style-name="T2">(3/10) </text:span> ⲟⲩⲁⲧϩⲉⲧ’[ϩⲱⲧϥ ⲡⲉ ϫⲉ ⲙ]ⲛ̅ ⲡⲉⲧϣⲟⲟ̣ⲡ <text:line-break/><text:span text:style-name="T1"> </text:span><text:span text:style-name="T2">(3/11) </text:span> ϩⲁⲧⲉϥϩⲏ ⲁ[ⲧⲣⲉϥϩⲉⲧϩⲱⲧϥ ⲟ]ⲩ̣ⲁ̣[ⲧϣⲓⲧϥ ⲡⲉ] <text:line-break/><text:span text:style-name="T1"> </text:span><text:span text:style-name="T2">(3/12) </text:span> ϫⲉ ⲙ̅ⲡⲉⲗⲁ[ⲁⲩ ϣⲱⲡⲉ ϩⲁⲧⲉϥϩⲏ ⲁⲧⲣⲉϥϣⲓ] <text:line-break/><text:span text:style-name="T1"> </text:span><text:span text:style-name="T2">(3/13) </text:span> ⲉⲣⲟϥ ⲟⲩⲁⲧ̣[ⲛⲁⲩ ⲉⲣⲟϥ ⲡⲉ ⲉⲃⲟⲗ ϫⲉ ⲙ̅ⲡⲉ]‐ <text:line-break/><text:span text:style-name="T1"> </text:span><text:span text:style-name="T2">(3/14) </text:span> ⲗⲁⲁⲩ ⲛⲁⲩ ⲉⲣ̣[ⲟϥ ⲟⲩϣⲁ ⲉⲛⲉϩ ⲡⲉ ⲉϥϣⲟⲟⲡ] <text:line-break/><text:span text:style-name="T1"> </text:span><text:span text:style-name="T2">(3/15) </text:span> ϣⲁ ⲉⲛⲉϩ ⲟⲩⲁ[ⲧϣⲁϫⲉ ⲉⲣⲟϥ ⲡⲉ ⲉⲃⲟⲗ ϫⲉ ⲙ̅]‐ <text:line-break/><text:span text:style-name="T1"> </text:span><text:span text:style-name="T2">(3/16) </text:span> ⲡⲉⲗⲁⲁⲩ ϣⲧⲉ[ϩⲟϥ ⲉϣⲁϫⲉ ⲉⲣⲟϥ ⲟⲩⲁⲧϯ]‐ <text:line-break/><text:span text:style-name="T1"> </text:span><text:span text:style-name="T2">(3/17) </text:span> ⲣⲁⲛ ⲉⲣⲟϥ ⲡ[ⲉ ⲉⲃⲟⲗ ϫⲉ ⲙⲛ̅ ⲡⲉⲧϩⲁⲧⲉϥϩⲏ] <text:line-break/><text:span text:style-name="T1"> </text:span><text:span text:style-name="T2">(3/18) </text:span> ⲁⲧⲣⲉϥϯ ⲣⲁⲛ ⲉ̣[ⲣⲟϥ ⲡⲟⲩⲟⲉⲓⲛ ⲛ̅ⲁⲧϣⲓⲧϥ] <text:line-break/><text:span text:style-name="T1"> </text:span><text:span text:style-name="T2">(3/19) </text:span> ⲡⲉ ⲉϥⲧⲃ̅ⲃⲏⲩ̣ ⲉ̣[ϥⲟⲩⲁⲁⲃ ⲛ̅ⲕⲁⲑⲁⲣⲟⲛ ⲟⲩⲁⲧ] <text:line-break/><text:span text:style-name="T1"> </text:span><text:span text:style-name="T2">(3/20) </text:span> ϣⲁϫ̣ⲉ ⲉⲣⲟϥ ⲡ[ⲉ ⲉϥϫⲏⲕ ⲉⲃⲟⲗ ϩⲛ̅ ⲧⲙ̅ⲛ̅ⲧ̅ⲁⲧ] <text:line-break/><text:span text:style-name="T1"> </text:span><text:span text:style-name="T2">(3/21) </text:span> ⲧⲉⲕⲟ̣ ϩⲛ̅ ⲟⲩ[ⲙ̅ⲛ̅ⲧ̅ⲧⲉⲗⲓⲟⲥ ⲁⲛ ⲟⲩⲧⲉ ϩⲛ̅] <text:line-break/><text:span text:style-name="T1"> </text:span><text:span text:style-name="T2">(3/22) </text:span> ⲟⲩⲙ̅ⲛ̅ⲧ̅ⲙⲁⲕ[ⲁⲣⲓⲟⲥ ⲁⲛ ⲟⲩⲧⲉ ϩⲛ̅ ⲟⲩⲙ̅ⲛⲧ̅]‐ <text:line-break/><text:span text:style-name="T1"> </text:span><text:span text:style-name="T2">(3/23) </text:span> ⲛⲟⲩⲧⲉ ⲁⲛ ⲁ[ⲗⲗⲁ ⲉϥⲥⲟⲧⲡ ⲛ̅ϩⲟⲩⲟ ⲟⲩⲥⲱ]‐ <text:line-break/><text:soft-page-break/><text:span text:style-name="T1"> </text:span><text:span text:style-name="T2">(3/24) </text:span> ⲙⲁⲧⲓⲕⲟⲥ ⲁⲛ [ⲡⲉ ⲟⲩⲧⲉ ⲟⲩⲁⲧⲥⲱⲙⲁ ⲁⲛ ⲡⲉ] <text:line-break/><text:span text:style-name="T1"> </text:span><text:span text:style-name="T2">(3/25) </text:span> ⲟⲩⲛⲟϭ ⲁⲛ ⲡ̣[ⲉ ⲟⲩⲧⲉ ⲟⲩϣⲏⲙ ⲁⲛ ⲡⲉ ⲙⲛ̅] <text:line-break/><text:span text:style-name="T1"> </text:span><text:span text:style-name="T2">(3/26) </text:span> ⲑⲉ ⲛ̅ϫⲟⲟⲥ ϫ[ⲉ ⲟⲩⲏⲣ ⲡⲉ ⲏ ⲟⲩ ⲙ̅ⲙⲓⲛⲉ ⲡⲉ] <text:line-break/><text:span text:style-name="T1"> </text:span><text:span text:style-name="T2">(3/27) </text:span> ⲙⲛ̅ ϭⲟⲙ ⲅⲁⲣ̣ [ⲛ̅ⲧⲉⲗⲁⲁⲩ ⲣ̅ⲛⲟⲉⲓ ⲙ̅ⲙⲟϥ ⲟⲩ]‐ <text:line-break/><text:span text:style-name="T1"> </text:span><text:span text:style-name="T2">(3/28) </text:span> ⲗⲁⲁⲩ ⲁⲛ ⲡⲉ̣ [ϩⲛ̅ ⲛⲉⲧϣⲟⲟⲡ’ ⲁⲗⲗⲁ ⲉϥⲥⲟⲧⲡ] <text:line-break/><text:span text:style-name="T1"> </text:span><text:span text:style-name="T2">(3/29) </text:span> ⲛ̅ϩⲟⲩⲟ ϩⲱⲥ̣ [ⲁⲛ ⲉϥⲥⲟⲧⲡ ⲁⲗⲗⲁ ⲙ̅ⲡⲁⲓ̈ ⲉ]‐ <text:line-break/><text:span text:style-name="T1"> </text:span><text:span text:style-name="T2">(3/30) </text:span> ⲧⲉ ⲡⲱϥ ⲉϥⲙⲉ̣[ⲧⲉⲭⲉ ⲁⲛ ϩⲛ̅ ⲛⲁⲓⲱⲛ ⲟⲩⲇⲉ] <text:line-break/><text:span text:style-name="T1"> </text:span><text:span text:style-name="T2">(3/31) </text:span> ϩⲛ̅ ⲭⲣⲟⲛⲟⲥ ⲡⲉ̣[ⲧⲙⲉⲧⲉⲭⲉ ⲅⲁⲣ ϩⲛ̅ ⲟⲩⲁⲓⲱⲛ] <text:line-break/><text:span text:style-name="T1"> </text:span><text:span text:style-name="T2">(3/32) </text:span> ⲡⲁⲓ̈ 〈ⲉⲛ〉ⲧⲁⲩⲣ̅ϣ̣[ⲟⲣⲡ ⲛ̅ⲥⲃ̅ⲧⲱⲧϥ ⲙ̅ⲡⲟⲩⲡⲟⲣϫϥ] <text:line-break/><text:span text:style-name="T1"> </text:span><text:span text:style-name="T2">(3/33) </text:span> ϩⲛ̅ ⲟⲩⲭⲣⲟⲛ̣[ⲟⲥ ϫⲉ ⲉⲃⲟⲗ ϩⲓⲧⲛ̅ ⲕⲉⲟⲩⲁ ⲉ]‐ <text:line-break/><text:span text:style-name="T1"> </text:span><text:span text:style-name="T2">(3/34) </text:span> ⲙⲁϥϫⲓ ⲗⲁ[ⲁⲩ ⲡⲉⲧⲟⲩϫⲓ ⲙ̅ⲙⲟϥ ⲅⲁⲣ ⲉⲡⲟⲩ]‐ <text:line-break/><text:span text:style-name="T1"> </text:span><text:span text:style-name="T2">(3/35) </text:span> ϣⲓⲡ ⲡⲉ· ϥϣ̣[ⲁⲁⲧ] ⲅ̣ⲁⲣ ⲁ̣[ⲛ] ⲛ̣̅ϭ̣[ⲓ ⲡⲉⲧⲟ ⲛ̅ϣⲟⲣⲡ] <text:line-break/><text:span text:style-name="T1"> </text:span><text:span text:style-name="T2">(3/36) </text:span> ⲉⲣⲟϥ ϫⲉⲕⲁ[ⲁⲥ] ⲉϥⲛⲁϫⲓ ⲉⲃ[ⲟⲗ ϩⲓⲧⲟⲟⲧϥ] <text:line-break/><text:span text:style-name="T1"> </text:span><text:span text:style-name="T2">(3/37) </text:span> ⲡⲁⲓ̈ ⲅⲁⲣ ⲉϥⲉⲓⲟⲣⲙ ⲛ̅ⲥⲱϥ ⲟ[ⲩⲁⲁⲧϥ ϩⲣⲁⲓ̈ ϩⲙ̅] <text:line-break/><text:span text:style-name="T1"> </text:span><text:span text:style-name="T2">(4/1) </text:span> ⲡ[ⲉϥ]ⲟⲩⲟⲉⲓⲛ ⲡ[ϫⲱⲕ ⲉⲃⲟⲗ ⲅⲁⲣ] ⲟ̣ⲩⲙⲉⲅⲉ‐ <text:line-break/><text:span text:style-name="T1"> </text:span><text:span text:style-name="T2">(4/2) </text:span> ⲑⲟⲥ ⲡⲉ ⲟⲩⲛ[ⲟⲩⲥ ⲛ̅ⲁⲕⲉⲣⲁⲓⲟⲥ ⲛ̅]ⲁⲧϣⲓⲧϥ <text:line-break/><text:span text:style-name="T1"> </text:span><text:span text:style-name="T2">(4/3) </text:span> ⲡⲉ ⲟⲩⲁⲓⲱ̣[ⲛ ⲡⲉ ⲉϥϯ ⲛ̅ⲟⲩⲁⲓⲱⲛ] ⲟ̣ⲩⲱⲛϩ <text:line-break/><text:span text:style-name="T1"> </text:span><text:span text:style-name="T2">(4/4) </text:span> ⲡⲉ ⲉϥϯ ⲛ̅ⲟ[ⲩⲱⲛϩ ⲟⲩⲙⲁⲕⲁⲣⲓⲟⲥ] ⲡ̣ⲉ ⲉϥϯ <text:line-break/><text:span text:style-name="T1"> </text:span><text:span text:style-name="T2">(4/5) </text:span> ⲛ̅ⲟⲩⲙ̅ⲛ̅ⲧ̅ⲙⲁ̣[ⲕⲁⲣⲓⲟⲥ ⲟⲩⲅⲛⲱⲥ]ⲓ̣ⲥ ⲡⲉ ⲉϥ‐ <text:line-break/><text:span text:style-name="T1"> </text:span><text:span text:style-name="T2">(4/6) </text:span> ϯ ⲛ̅ⲟⲩⲥⲟⲟⲩⲛ̣ [ⲟⲩⲁⲅⲁⲑⲟⲥ ⲡⲉ ⲉϥ]ϯ ⲛ̅ⲟⲩⲙ̅ⲛ̅ⲧ̅‐ <text:line-break/><text:span text:style-name="T1"> </text:span><text:span text:style-name="T2">(4/7) </text:span> ⲁⲅⲁⲑⲟⲥ ⲟⲩⲛ̣[ⲁⲉ ⲡⲉ ⲉϥϯ ⲛ̅ⲛⲟⲩⲛ]ⲁ ⲙⲛ̅ ⲟⲩⲥⲱⲧⲉ <text:line-break/><text:span text:style-name="T1"> </text:span><text:span text:style-name="T2">(4/8) </text:span> ⲟⲩⲭⲁⲣⲓⲥ ⲡⲉ ⲉ[ϥϯ ⲛ̅ⲟⲩϩⲙⲟⲧ ⲟⲩⲭ] ϩⲟⲧⲓ ϫⲉ ⲟⲩⲛ̅‐ <text:line-break/><text:span text:style-name="T1"> </text:span><text:span text:style-name="T2">(4/9) </text:span> ⲧⲁ̣[ⲥ]ϥ ⲁⲗⲗ̣ⲁ̣ ϫ̣[ⲉ ⲉϥϯ ⲙ̅ⲡⲟⲩⲟⲉⲓⲛ]ⲉ̣ ⲛ̅ⲁⲧϣⲓⲧϥ ⲛ̅‐ <text:line-break/><text:span text:style-name="T1"> </text:span><text:span text:style-name="T2">(4/10) </text:span> [ⲁⲧⲧⲉϩⲟϥ ⲡⲱⲥ ϯϣⲁϫⲉ ⲛⲙ̅ⲙⲁ]ⲕ̣ ⲉⲧⲃⲏⲧϥ ⲡⲉϥ‐ <text:line-break/><text:span text:style-name="T1"> </text:span><text:span text:style-name="T2">(4/11) </text:span> [ⲁⲓⲱⲛ ⲅⲁⲣ ⲟⲩⲁⲧⲧⲉⲕⲟ ⲡⲉ ⲉϥⲥ]ϭⲣⲁϩⲧ ⲁⲩⲱ ⲉϥ‐ <text:line-break/><text:span text:style-name="T1"> </text:span><text:span text:style-name="T2">(4/12) </text:span> [ϣⲟⲟⲡ ϩⲛ̅ ⲟⲩⲥⲓⲅⲏ ⲉϥⲙ̅ⲧⲟⲛ] ⲙ̣̅ⲙⲟϥ ⲉϥⲟ ⲛ̅‐ <text:line-break/><text:span text:style-name="T1"> </text:span><text:span text:style-name="T2">(4/13) </text:span> [ϣⲟⲣⲡ ⲉⲡⲧⲏⲣϥ ⲛ̅ⲧⲟϥ ⲅⲁⲣ ⲡ]ⲉ̣ ⲧⲁⲡⲉ ⲛ̅ⲁⲓⲱⲛ <text:line-break/><text:span text:style-name="T1"> </text:span><text:span text:style-name="T2">(4/14) </text:span> [ⲧⲏⲣⲟⲩ ⲁⲩⲱ ⲛ̅ⲧⲟϥ ⲉⲧϯ ⲛⲁⲩ ⲛ̅]ⲟⲩⲧⲁϫⲣⲟ ϩⲣⲁⲓ̈ ϩⲛ̅ <text:line-break/><text:span text:style-name="T1"> </text:span><text:span text:style-name="T2">(4/15) </text:span> [ⲧⲉϥⲙ̅ⲛ̅ⲧ̅ⲁⲅⲁⲑⲟⲥ ⲧⲛ̅ⲥⲟⲟⲩ]ⲛ ⲅⲁⲣ ⲁⲛ ⲁⲛⲟⲛ ⲁ‐ <text:line-break/><text:span text:style-name="T1"> </text:span><text:span text:style-name="T2">(4/16) </text:span> [ⲛⲉⲧⲟ ⲛ̅ⲁⲧϣⲁϫⲉ ⲉⲣⲟϥ ⲁⲩⲱ ⲛ̅]ⲧ̣ⲛ̅ⲙ̅ⲙⲉ ⲁⲛ 〈ⲁⲛ〉ⲉⲧ’ <text:line-break/><text:span text:style-name="T1"> </text:span><text:span text:style-name="T2">(4/17) </text:span> [ⲟ ⲛ̅ⲁⲧϣⲓⲧϥ ⲉⲓⲙⲏⲧⲓ ⲁⲡⲉⲛ]ⲧ̣ⲁϩⲟⲩⲱⲛϩ ⲉⲃⲟⲗ <text:line-break/><text:span text:style-name="T1"> </text:span><text:span text:style-name="T2">(4/18) </text:span> [ⲉⲃⲟⲗ ⲛ̅ϩⲏⲧϥ ⲉⲧⲉ ⲡⲁⲓ̈ ⲡⲉ ⲡ]ⲉⲓⲱⲧ ⲡⲁⲓ̈ ⲅⲁⲣ ⲡⲉ‐ <text:line-break/><text:span text:style-name="T1"> </text:span><text:span text:style-name="T2">(4/19) </text:span> [ⲧⲁϩϫⲟⲟⲥ ⲉⲣⲟⲛ ϩⲱⲱⲛ ⲛ̅]ⲧ̣ⲟϥ ⲅⲁⲣ ⲉⲧϭ̣ⲟϣⲧ ⲉ‐ <text:line-break/><text:span text:style-name="T1"> </text:span><text:span text:style-name="T2">(4/20) </text:span> [ⲣⲟϥ ⲟⲩⲁⲁⲧϥ ϩⲣⲁⲓ̈ ϩⲙ̅ ⲡⲉϥⲟ]ⲩ̣ⲟⲉⲓⲛ [ⲉⲧ]ⲕ̣ⲧⲏⲩ ⲉ̣‐ <text:line-break/><text:span text:style-name="T1"> </text:span><text:span text:style-name="T2">(4/21) </text:span> [ⲣⲟϥ ⲉⲧⲉ ⲡⲁⲓ̈ ⲡⲉ ⲧⲡⲏⲅⲏ ⲙ̅ⲡ]ⲙⲟⲟⲩ ⲛ̅ⲱ̣ⲛϩ ⲁⲩⲱ <text:line-break/><text:span text:style-name="T1"> </text:span><text:span text:style-name="T2">(4/22) </text:span> [ⲉϥϯ ⲛ̅ⲛⲁⲓⲱⲛ ⲧⲏⲣⲟⲩ ⲁⲩⲱ ϩ]ⲛ̣̅ ⲥⲙⲟⲧ ⲛⲓⲙ ⲉϥⲉⲓ̣‐ <text:line-break/><text:span text:style-name="T1"> </text:span><text:span text:style-name="T2">(4/23) </text:span> [ⲱⲣⲙ ⲛ̅ⲥⲁ ⲧⲉϥϩⲓⲕⲱⲛ ⲉϥⲛ]ⲁⲩ ⲉⲣⲟⲥ ϩⲣⲁ[ⲓ̈] <text:line-break/><text:span text:style-name="T1"> </text:span><text:span text:style-name="T2">(4/24) </text:span> [ϩⲛ̅ ⲧⲡⲏⲅⲏ ⲛ̅ⲧⲉ ⲡⲉⲡ̅ⲛ̅ⲁ̅ ⲉϥ]ⲟⲩⲱϣⲉ ϩⲙ̅ ⲡⲉϥ‐ <text:line-break/><text:span text:style-name="T1"> </text:span><text:span text:style-name="T2">(4/25) </text:span> [ⲟⲩⲟⲉⲓⲛ ⲙ̅ⲙⲟⲟⲩ ⲉⲧϩⲛ̅ ⲧⲡⲏⲛ̅]ⲧⲡⲏⲅⲏ ⲛ̅ⲧⲉ ⲡⲙⲟ‐ <text:line-break/><text:span text:style-name="T1"> </text:span><text:span text:style-name="T2">(4/26) </text:span> [ⲟⲩ ⲛ̅ⲟⲩⲟⲉⲓⲛ ⲉⲧⲧⲃ̅ⲃⲏⲩ ⲉⲧ]ⲕ̣ⲧⲏⲩ ⲉⲣⲟϥ ⲁⲩⲱ <text:line-break/><text:span text:style-name="T1"> </text:span><text:span text:style-name="T2">(4/27) </text:span> [ⲁⲧⲉϥⲉⲛⲛⲟⲓⲁ ⲧⲁⲙⲓⲟ ⲛ̅ⲟⲩ]ϩⲱⲃ ⲁⲩⲱ ⲁⲥϭⲱⲗⲡ’ <text:line-break/><text:span text:style-name="T1"> </text:span><text:span text:style-name="T2">(4/28) </text:span> [ⲉⲃⲟⲗ ⲛ̅ϭⲓ ⲧⲁⲓ̈ ⲉⲛⲧⲁϩⲟⲩⲱⲛ]ϩ ⲉⲃⲟⲗ ⲙ̅ⲡⲉϥⲙ̅‐ <text:line-break/><text:span text:style-name="T1"> </text:span><text:span text:style-name="T2">(4/29) </text:span> [ⲧⲟ ⲉⲃⲟⲗ ϩⲙ̅ ⲡⲣ̅ⲣⲓⲉ ⲛ̅ⲧⲉ] ⲡⲉϥⲟⲩⲟⲉⲓⲛ ⲧⲁⲓ̈ ⲧⲉ‐ <text:line-break/><text:span text:style-name="T1"> </text:span><text:span text:style-name="T2">(4/30) </text:span> [ⲧϣⲟⲣⲡ ⲛ̅ϭⲟⲙ ⲛ̅ⲧⲁϩϣ]ⲱ̣ⲡⲉ ϩⲁⲧⲟⲩⲉϩⲏ ⲧⲏ‐ <text:line-break/><text:span text:style-name="T1"> </text:span><text:span text:style-name="T2">(4/31) </text:span> [ⲣⲟⲩ ⲛ̅ⲧⲁϩⲟⲩⲱⲛϩ ⲉⲃⲟⲗ ϩⲙ̅] ⲡ̣ⲉ̣ϥⲙⲉⲉⲩⲉ ⲉⲧⲉ <text:line-break/><text:span text:style-name="T1"> </text:span><text:span text:style-name="T2">(4/32) </text:span> [ⲧⲁⲓ̈ ⲧⲉ ⲧⲡⲣⲟⲛⲟⲓⲁ ⲙ̅ⲡⲧⲏⲣϥ ⲡ]ⲉ̣ⲥⲟⲩⲟⲉⲓⲛ ⲉ‐ <text:line-break/><text:span text:style-name="T1"> </text:span><text:span text:style-name="T2">(4/33) </text:span> [ⲧⲣ̅ ⲟⲩⲟⲉⲓⲛ ϩⲙ̅ ⲡⲉⲓⲛⲉ ⲛ̅ⲧⲉ ⲡⲉϥ]ⲟ̣ⲩⲟⲉⲓⲛ ⲧϭⲟⲙ’ <text:line-break/><text:soft-page-break/><text:span text:style-name="T1"> </text:span><text:span text:style-name="T2">(4/34) </text:span> [ⲉⲧϫⲏⲕ ⲉ]ⲃ̣ⲟⲗ [ⲉ]ⲧ̣ⲉ ⲧⲁⲓ̣̈ [ⲧⲉ ⲑⲓ]ⲕⲱⲛ ⲙ̅ⲡⲓⲁⲧⲛⲁⲩ <text:line-break/><text:span text:style-name="T1"> </text:span><text:span text:style-name="T2">(4/35) </text:span> [ⲉⲣⲟϥ ⲙ̅ⲡ]ⲁⲣⲑⲉⲛⲓⲕⲟⲛ ⲙ̅ⲡ̅ⲛ̣̅̅ⲁ̅ ⲉϥϫⲏⲕ ⲉⲃⲟⲗ <text:line-break/><text:span text:style-name="T1"> </text:span><text:span text:style-name="T2">(4/36) </text:span> [ⲧϣⲟⲣⲡ ⲛ̅ϭ]ⲟ̣ⲙ ⲡⲉⲟⲟⲩ ⲛ̅ⲃⲁⲣⲃⲏⲗⲱ ⲡⲉⲟⲟⲩ <text:line-break/><text:span text:style-name="T1"> </text:span><text:span text:style-name="T2">(5/1) </text:span> ⲉⲧϫⲏⲕ ⲉⲃⲟ̣[ⲗ] ϩⲛ̅ ⲛⲁⲓⲱⲛ ⲡ̣ⲉⲟⲟⲩ ⲙ̅ⲡⲟⲩ‐ <text:line-break/><text:span text:style-name="T1"> </text:span><text:span text:style-name="T2">(5/2) </text:span> ⲱⲛϩ ⲉⲃⲟ̣[ⲗ] ⲁ̣[ⲥ]ϯ ⲉⲟ[ⲟ]ⲩ ⲙ̅ⲡ[ⲡ]ⲁⲣⲑⲉⲛⲓⲕⲟⲛ <text:line-break/><text:span text:style-name="T1"> </text:span><text:span text:style-name="T2">(5/3) </text:span> ⲙ̅ⲡ̅ⲛ̅ⲁ̅ ⲁⲩⲱ ⲉ̣ⲥⲥⲙ̣ⲟⲩ ⲉⲣⲟϥ ϫⲉ ⲉⲧⲃⲏⲧϥ <text:line-break/><text:span text:style-name="T1"> </text:span><text:span text:style-name="T2">(5/4) </text:span> ⲁⲥⲥⲟⲩⲱⲛϩ ⲉⲃⲟⲗ ⲡⲁⲓ̈ ⲡⲉ ⲡϣⲟⲣⲡ ⲙ̅ⲙⲉⲉⲩⲉ <text:line-break/><text:span text:style-name="T1"> </text:span><text:span text:style-name="T2">(5/5) </text:span> ⲛ̅ⲧⲉϥϩⲓⲕⲱ̣ⲛ̣’ ⲁⲥϣⲱⲡⲉ ⲙ̅ⲙⲏⲧⲣⲁ ⲙ̅ⲡⲧⲏⲣϥ <text:line-break/><text:span text:style-name="T1"> </text:span><text:span text:style-name="T2">(5/6) </text:span> ϫⲉ ⲛ̅ⲧⲟⲥ ⲉ̣[ⲥ]ⲟ ⲛ̅ϣⲟⲣⲡ ⲉⲣⲟⲟⲩ ⲧⲏⲣⲟⲩ· ⲧⲙ̅ⲏ̅‐ <text:line-break/><text:span text:style-name="T1"> </text:span><text:span text:style-name="T2">(5/7) </text:span> ⲧ̅ⲣ̅ⲟ̅ⲡⲁⲧ̅ⲱ̣[ⲣ̅] ⲡϣⲟⲣⲡ’ ⲛ̅ⲣⲱⲙⲉ ⲡ̅ⲛⲁ̅ ⲉⲧⲟⲩ‐ <text:line-break/><text:span text:style-name="T1"> </text:span><text:span text:style-name="T2">(5/8) </text:span> ⲁⲁⲃ· ⲡϣⲟⲙ̣ⲧ̣ 〈ⲛ̅〉ϩⲟⲟⲩⲧ ⲧϣⲟⲙⲧⲉ ⲛ̅ϭⲟⲙ <text:line-break/><text:span text:style-name="T1"> </text:span><text:span text:style-name="T2">(5/9) </text:span> ⲡϣⲟⲙⲧ ⲛ̅ⲣⲁⲛ ⲛ̅ϩ̣ⲟ̣[ⲟ]ⲩⲧ ⲥϩⲙⲉ ⲁⲩⲱ ⲡⲁⲓ‐ <text:line-break/><text:span text:style-name="T1"> </text:span><text:span text:style-name="T2">(5/10) </text:span> ⲱⲛ ⲛ̅ϣⲁ ⲉⲛⲉϩ ϩⲛ̅ ⲛ̅ⲁⲧⲛⲁⲩ ⲉⲣⲟⲟⲩ ⲁⲩ̣ⲱ̣ <text:line-break/><text:span text:style-name="T1"> </text:span><text:span text:style-name="T2">(5/11) </text:span> ⲡϣⲟⲣⲡ ⲛ̅ⲉⲓ ⲉⲃⲟⲗ ⲁϥ[ⲁⲓ]ⲧⲉⲓ ⲉⲃⲟⲗ ϩⲓⲧⲛ̅ <text:line-break/><text:span text:style-name="T1"> </text:span><text:span text:style-name="T2">(5/12) </text:span> ⲡⲁϩⲟⲣⲁⲧⲟⲛ ⲙ̅ⲡⲁⲣⲑ̣ⲉ̣ⲛⲓⲕⲟⲛ ⲙ̅ⲡ̅ⲛ̅ⲁ̅ <text:line-break/><text:span text:style-name="T1"> </text:span><text:span text:style-name="T2">(5/13) </text:span> ⲉⲧⲉ ⲃ̅ⲁ̅ⲣ̅ⲃ̅ⲏ̅ⲗ̅ⲱ̅ ⲧⲉ ⲁⲧⲛ̣̅ ⲛ̣ⲁⲥ ⲛ̅ⲟⲩⲡⲣ̣[ⲟ]ⲅ̣ⲛ[ⲱ]‐ <text:line-break/><text:span text:style-name="T1"> </text:span><text:span text:style-name="T2">(5/14) </text:span> ⲥⲓⲥ ⲁⲩⲱ ⲁϥⲉⲓⲱⲣⲙ’ ⲛ̅ϭ̣ⲓ̣ ⲡ̅ⲛ̅ⲁ̅ ⲛ̅ⲧⲁ[ϥ]ⲉ̣[ⲓ]ⲱ̣[ⲣⲙ] <text:line-break/><text:span text:style-name="T1"> </text:span><text:span text:style-name="T2">(5/15) </text:span> ⲇⲉ ⲁⲥϭⲱⲗⲡ ⲉⲃⲟⲗ̣ [ⲛ̅]ϭⲓ ⲧⲡⲣⲟⲅⲛⲱⲥⲓ[ⲥ ⲁⲩ]‐ <text:line-break/><text:span text:style-name="T1"> </text:span><text:span text:style-name="T2">(5/16) </text:span> ⲱ ⲁⲥⲁϩⲉⲣⲁⲧ̅ⲥ̅ ⲙⲛ̅ ⲧ̣[ⲡ]ⲣⲟⲛⲟⲓⲁ· ⲧⲁⲓ̈ ⲟⲩⲉⲃ̣[ⲟⲗ ] <text:line-break/><text:span text:style-name="T1"> </text:span><text:span text:style-name="T2">(5/17) </text:span> ⲧⲉ ϩⲙ̅ ⲡⲙⲉⲉⲩⲉ ⲙ̅ⲡ̣ⲓ̣ⲁⲧ ⲛⲁⲩ ⲉⲣⲟϥ ⲙ̅[ⲡⲁⲣ]‐ <text:line-break/><text:span text:style-name="T1"> </text:span><text:span text:style-name="T2">(5/18) </text:span> ⲑⲉⲛⲓⲕⲟⲛ ⲙ̅ⲡ̅ⲛ̅ⲁ̅ ⲉⲥ̣ϯ̣ ⲉⲟⲟ̣ⲩ̣ ⲛⲁϥ ⲁ[ⲩⲱ] <text:line-break/><text:span text:style-name="T1"> </text:span><text:span text:style-name="T2">(5/19) </text:span> ⲧⲉϥϭⲟⲙ ⲉⲧϫⲏⲕ ⲉⲃⲟ[ⲗ ⲃ̅ⲁ̅]̅ⲣ̣̅̅ⲃ̅ⲏ̅ⲗ̅ⲱ̣̅̅ ϫ[ⲉ ⲛ̅]‐ <text:line-break/><text:span text:style-name="T1"> </text:span><text:span text:style-name="T2">(5/20) </text:span> ⲧⲁⲥ̣ϣⲱⲡⲉ ⲉ̣[ⲧⲃⲏ]ⲧ̣ⲥ̅ ⲁ[ⲩⲱ ⲟ]ⲛ ⲁⲥⲁⲓⲧⲉ̣[ⲓ] <text:line-break/><text:span text:style-name="T1"> </text:span><text:span text:style-name="T2">(5/21) </text:span> ⲉⲧⲛ̅ ⲛⲁⲥ ⲛ̅ϭ̣[ⲓ ⲧⲙ̅ⲛ̅ⲧ̅]ⲁⲧ ⲧⲉⲕ]ⲟ̣ ⲁ̣ⲩⲱ ⲁϥⲉⲓ̣‐ <text:line-break/><text:span text:style-name="T1"> </text:span><text:span text:style-name="T2">(5/22) </text:span> ⲱⲣⲙ ϩⲙ̅ ⲡⲧⲣⲉ̣[ϥⲉⲓⲱⲣⲙ ⲁⲥϭⲱⲗ]ⲡ ⲉⲃⲟⲗ <text:line-break/><text:span text:style-name="T1"> </text:span><text:span text:style-name="T2">(5/23) </text:span> ⲛ̅ϭⲓ ⲧⲙ̅ⲛ̅ⲧ̅ⲁⲧ ⲧ̣[ⲉⲕ]ⲟ ⲁ[ⲩⲱ ⲁⲥⲁϩⲉⲣ]ⲁ̣ⲧ̅ⲥ̅ ⲙⲛ̅ <text:line-break/><text:span text:style-name="T1"> </text:span><text:span text:style-name="T2">(5/24) </text:span> ⲡⲙⲉⲉⲩⲉ ⲁⲩⲱ̣ [ⲧ]ⲡⲣⲟⲅ̣ⲛ̣ⲱⲥⲓ̣ⲥ̣ ⲁ̣ⲥ̣ϯ ⲉⲟⲟⲩ <text:line-break/><text:span text:style-name="T1"> </text:span><text:span text:style-name="T2">(5/25) </text:span> ⲙ̅ⲡⲓⲁⲧ ⲛⲁⲩ ⲉⲣ[ⲟ]ϥ ⲙⲛ̅ ⲧⲃⲁⲣⲃⲏⲗⲱ ⲧⲁⲓ̈ ⲉ‐ <text:line-break/><text:span text:style-name="T1"> </text:span><text:span text:style-name="T2">(5/26) </text:span> ⲧⲁⲩϣⲱⲡⲉ ⲉⲧ[ⲃⲏⲧ]ⲥ̅ ⲁⲩⲱ ⲁⲥⲁⲓⲧⲉⲓ [ⲛ̅]ϭⲓ ⲧⲃ̅ⲁ̅ⲣ̅‐ <text:line-break/><text:span text:style-name="T1"> </text:span><text:span text:style-name="T2">(5/27) </text:span> ⲃⲏⲗⲱ ⲉⲧⲛ̅ ⲛⲁⲥ ⲛ̅ⲟⲩⲱ[ⲛϩ] ϣ̣ⲁ̣[ⲉ]ⲛ̣ⲉϩ ⲁⲩⲱ <text:line-break/><text:span text:style-name="T1"> </text:span><text:span text:style-name="T2">(5/28) </text:span> ⲁϥⲉⲓⲱⲣⲙ ⲛ̅ϭⲓ ⲡⲁ̣[ϩ]ⲟⲣⲁⲧⲟⲛ ⲙ̅ⲡ̅ⲛ̅ⲁ̅ ⲁⲩⲱ <text:line-break/><text:span text:style-name="T1"> </text:span><text:span text:style-name="T2">(5/29) </text:span> ϩⲙ̅ ⲡⲧⲣⲉϥⲉⲓⲱⲣⲙ ⲁ̣ϥϭⲱ̣ⲗⲡ ⲉ̣ⲃⲟⲗ ⲛ̅ϭⲓ ⲡⲱⲛϩ <text:line-break/><text:span text:style-name="T1"> </text:span><text:span text:style-name="T2">(5/30) </text:span> ϣⲁ ⲉⲛⲉϩ ⲁⲩⲱ ⲁ[ⲩⲁϩ]ⲉⲣ̣[ⲁⲧⲟⲩ] ⲁ̣ⲩϯ ⲉⲟⲟⲩ <text:line-break/><text:span text:style-name="T1"> </text:span><text:span text:style-name="T2">(5/31) </text:span> ⲙ̅ⲡⲁϩⲟⲣⲁⲧⲟⲛ ⲙ̅[ⲡ̅ⲛ̅]̅ⲁ̅ ⲁ̣[ⲩⲱ ⲧⲃ̅]ⲁ̣ⲣⲃⲏⲗⲱ̅ ⲧⲁⲓ̈ <text:line-break/><text:span text:style-name="T1"> </text:span><text:span text:style-name="T2">(5/32) </text:span> ⲉⲛⲧⲁⲩϣⲱⲡⲉ ⲉⲧ̣[ⲃⲏⲧⲥ̅] ⲁⲩⲱ ⲟⲛ ⲁⲥⲁⲓⲧⲉⲓ̣ <text:line-break/><text:span text:style-name="T1"> </text:span><text:span text:style-name="T2">(5/33) </text:span> ⲉⲧⲛ̅ ⲛⲁⲥ ⲛ̅ⲧⲙ[ⲏⲉ] ⲁ̣ⲩⲱ̣ [ⲁ]ϥ̣ⲉⲓⲱⲣⲙ ⲛ̅ϭⲓ ⲡⲁϩⲟ̣‐ <text:line-break/><text:span text:style-name="T1"> </text:span><text:span text:style-name="T2">(5/34) </text:span> ⲣⲁⲧⲟⲛ ⲙ̅ⲡⲛ̅ⲁ̅ ⲁⲥϭⲱⲗⲡ ⲉⲃⲟⲗ ⲛ̅ϭⲓ ⲧⲙⲏⲉ <text:line-break/><text:span text:style-name="T1"> </text:span><text:span text:style-name="T2">(5/35) </text:span> ⲁⲩⲱ ⲁⲩⲁϩⲉⲣⲁⲧⲟⲩ ⲁⲩϯ ⲉⲟⲟⲩ ⲙ̅ⲡⲁϩⲟⲣⲁⲧⲟ̣[ⲛ] <text:line-break/><text:span text:style-name="T1"> </text:span><text:span text:style-name="T2">(6/1) </text:span> ⲙ̣̅ⲡ̅ⲛ̅ⲁ̅ ⲉⲧϣⲏ̣ⲡ ⲙⲛ̅ ⲧⲉϥ̣ⲃ[ⲁ]ⲣⲃⲏⲗⲱ ⲧⲁⲓ̈ <text:line-break/><text:span text:style-name="T1"> </text:span><text:span text:style-name="T2">(6/2) </text:span> ⲉⲛ’ⲧⲁ→ⲩ← ϣⲱⲡ[ⲉ] ⲉⲧⲃⲏ̣ⲧⲥ̅ ⲧ[ⲁ]ⲓ̣̈ ⲧⲉ ⲧⲡⲉⲛⲧⲁⲥ <text:line-break/><text:span text:style-name="T1"> </text:span><text:span text:style-name="T2">(6/3) </text:span> ⲛ̅ⲁⲓⲱⲛ’ ⲛ̅ⲧⲉ ⲡⲓⲱⲧ [ⲉ]ⲧⲉ ⲡ[ⲁⲓ̈] ⲡⲉ ⲡϣⲟⲣⲡ <text:line-break/><text:span text:style-name="T1"> </text:span><text:span text:style-name="T2">(6/4) </text:span> ⲛ̅ⲣⲱⲙⲉ ⲑⲓⲕⲱⲛ ⲙ̅ⲡⲓⲁϩⲟⲣⲁ̣[ⲧ]ⲟ̣ⲥ ⲙ̅ⲡⲛ̅ⲁ̅ <text:line-break/><text:span text:style-name="T1"> </text:span><text:span text:style-name="T2">(6/5) </text:span> ⲧⲁⲓ̈ ⲧⲉ ⲧⲡⲣⲟⲛⲟⲓⲁ· ⲉⲧⲉ ⲧⲁⲓ̈ ⲧ[ⲉ] ⲃ̅ⲁ̅ⲣ̅ⲃ̅ⲏ̅ⲗ̅ⲱ̅ <text:line-break/><text:span text:style-name="T1"> </text:span><text:span text:style-name="T2">(6/6) </text:span> ⲁⲩⲱ ⲡⲙⲉⲉⲩⲉ ⲙⲛ̅ ⲧⲡⲣⲟⲅⲛⲱ̣ⲥⲓⲥ ⲁⲩⲱ <text:line-break/><text:span text:style-name="T1"> </text:span><text:span text:style-name="T2">(6/7) </text:span> ⲧⲙ̅ⲛ̅ⲧ̅ⲁⲧ ⲧⲉⲕⲟ ⲁⲩⲱ ⲡⲱⲛϩ [ϣ]ⲁ ⲉⲛⲉϩ· ⲁⲩⲱ <text:line-break/><text:span text:style-name="T1"> </text:span><text:span text:style-name="T2">(6/8) </text:span> ⲧⲙⲉ·ⲧⲁⲓ̈ ⲧⲉ ⲧⲡⲉⲛⲧⲁⲥ ⲛ̅ⲁ[ⲓ]ⲱ̣ⲛ ⲛ̅ϩⲟⲟⲩⲧ ⲥϩⲓ‐ <text:line-break/><text:span text:style-name="T1"> </text:span><text:span text:style-name="T2">(6/9) </text:span> ⲙⲉ ⲉⲧⲉ ⲧⲁⲓ̈ ⲧⲉ ⲧⲇⲉ̣[ⲕⲁ]ⲥ ⲛ̅ⲁⲓⲱⲛ ⲉⲧⲉ ⲡⲁⲓ̈ ⲡⲉ <text:line-break/><text:soft-page-break/><text:span text:style-name="T1"> </text:span><text:span text:style-name="T2">(6/10) </text:span> ⲡⲉ̣[ⲓ]ⲱⲧ ⲁⲩⲱ ⲁϥϭⲱϣⲧ ⲉϩⲟⲩⲛ ϩⲛ̅ ⲧⲃ̅ⲁ̅ⲣ̅ⲃ̅ⲏ̅ⲗ̅ⲱ̅ <text:line-break/><text:span text:style-name="T1"> </text:span><text:span text:style-name="T2">(6/11) </text:span> ϩⲙ̅ ⲡⲟⲩⲟⲉⲓⲛ ⲉ[ⲧ]ⲧⲃ̅ⲃⲏⲩ ⲉⲧⲕⲧⲏⲩ ⲁⲡⲁϩⲟⲣⲁ‐ <text:line-break/><text:span text:style-name="T1"> </text:span><text:span text:style-name="T2">(6/12) </text:span> ⲧ̣ⲟⲛ ⲙ̅ⲡ̅ⲛ̅ⲁ̅ ⲙⲛ̣̅ ⲡ̣ⲉϥⲡⲣ̅ⲣⲉ ⲁⲩⲱ ⲁⲥϫⲉ ⲟⲩⲱ <text:line-break/><text:span text:style-name="T1"> </text:span><text:span text:style-name="T2">(6/13) </text:span> [ⲉⲣⲟϥ ⲁ]ϥϫⲡⲟ ⲛ̅ⲟⲩϯⲕ̅ ⲛ̅ⲟⲩⲟⲉⲓⲛ’ ϩⲛ̅ ⲟⲩⲟⲉⲓ‐ <text:line-break/><text:span text:style-name="T1"> </text:span><text:span text:style-name="T2">(6/14) </text:span> [ⲛ]ⲉ ⲙ̅ⲙ̅ⲛ̅ⲧ̅ⲙⲁⲕⲁⲣⲓ[ⲟⲥ] ⲛ̅ⲉⲓⲛⲉ· ⲉϥϣⲏϣ ⲇⲉ <text:line-break/><text:span text:style-name="T1"> </text:span><text:span text:style-name="T2">(6/15) </text:span> [ⲁⲛ] ⲙⲛ̅ ⲧⲉϥⲙ̅ⲛ̅ⲧ̅ⲛ[ⲟ]ϭ ⲡⲁⲓ̈ ⲛⲉⲟⲩϣⲣ̅ⲟⲩⲱⲧ <text:line-break/><text:span text:style-name="T1"> </text:span><text:span text:style-name="T2">(6/16) </text:span> [ⲡⲉ] ⲛ̅ⲧⲙⲏⲧⲣⲟⲡⲁⲧⲱⲣ ⲉⲁϥⲟⲩⲱⲛϩ ⲉⲃⲟⲗ ⲉⲧⲉ <text:line-break/><text:span text:style-name="T1"> </text:span><text:span text:style-name="T2">(6/17) </text:span> [ⲡⲁⲓ̈] ⲡⲉ ⲡⲉ̣ϥϫⲡⲟ̣ ⲟⲩⲁⲁⲧϥ ⲡϣⲣ̅ⲟⲩⲱⲧ ⲛ̅‐ <text:line-break/><text:span text:style-name="T1"> </text:span><text:span text:style-name="T2">(6/18) </text:span> [ⲧ]ⲉ [ⲡ]ⲉⲓⲱⲧ̣ [ⲡⲟⲩ]ⲟⲉⲓⲛ ⲉⲧⲧⲃ̅ⲃⲏⲩ ⲁ[ϥ]ⲧ̣ⲉⲗⲏⲗ <text:line-break/><text:span text:style-name="T1"> </text:span><text:span text:style-name="T2">(6/19) </text:span> [ⲇ]ⲉ ⲛ̅ϭⲓ ⲡⲁ[ϩⲟⲣ]ⲁ̣ⲧⲟⲛ’ [ⲙ̅]ⲡ̣ⲁⲣⲑⲉⲛⲓⲕⲟ̣ⲛ ⲙ̅ⲡ̅ⲛ̅ⲁ̣̅̅ <text:line-break/><text:span text:style-name="T1"> </text:span><text:span text:style-name="T2">(6/20) </text:span> ⲉϩⲣⲁⲓ̈ ⲉϫⲙ̣̅ [ⲡⲟ]ⲩ̣ⲟⲉ̣[ⲓⲛ ⲉⲧⲁ]ϩϣⲱⲡⲉ ⲡⲉⲧⲁϩ‐ <text:line-break/><text:span text:style-name="T1"> </text:span><text:span text:style-name="T2">(6/21) </text:span> ϣⲣⲡ ⲟ[ⲩⲱⲛϩ ⲉⲃⲟⲗ ⲉⲃⲟⲗ] ϩ̣ⲛ̅ ⲧ̣ϣⲟⲣⲡ ⲛ̅ϭⲟ̣[ⲙ] <text:line-break/><text:span text:style-name="T1"> </text:span><text:span text:style-name="T2">(6/22) </text:span> ⲛ̅ⲧ〈ⲉ〉ϥ ⲡ[ⲣⲟⲛⲟⲓⲁ] ⲉ[ⲧⲉ] ⲧ̣ⲁⲓ̈ ⲧⲉ ⲧⲃ̅ⲁ̅ⲣ̅ⲃ̅ⲏ̅ⲗ̅ⲱ̅ <text:line-break/><text:span text:style-name="T1"> </text:span><text:span text:style-name="T2">(6/23) </text:span> ⲁⲩⲱ ⲁϥ̣[ⲧ]ⲱϩⲥ̅ ⲙ̣̅ⲙⲟϥ’ ⲉ̣[ⲃⲟ]ⲗ ϩⲛ̅ ϯⲙ̅ⲛ̅ⲧⲭⲣ̅ⲥ̅ <text:line-break/><text:span text:style-name="T1"> </text:span><text:span text:style-name="T2">(6/24) </text:span> ⲛ̅ⲧⲏϥ ϣⲁⲛⲧⲉϥ ϣⲱⲡⲉ ⲛ̅ⲧⲉⲗⲉⲓⲟⲥ ⲉⲛϥϣⲁ‐ <text:line-break/><text:span text:style-name="T1"> </text:span><text:span text:style-name="T2">(6/25) </text:span> ⲁⲧ ⲛ̅[ⲗ]ⲁⲁⲩ →ⲁ←ⲛ ⲙ̣̅ⲙ̅ⲛ̅ⲧ̅[ⲭ̅]ⲣ̣[ⲥ̅] ⲉⲃⲟⲗ ϫⲉ ⲉⲁϥⲧⲁϩⲥϥ <text:line-break/><text:span text:style-name="T1"> </text:span><text:span text:style-name="T2">(6/26) </text:span> ϩⲣⲁⲓ̈ ϩⲛ̅ ⲧ[ⲙ̅]̅ⲛ̅ⲧ̣̅̅[ⲭ̅]ⲣ̣ⲥ̅ ⲙ̅ⲡ̣ⲁϩⲟⲣⲁⲧⲟⲥ ⲙ̅ⲡ̅ⲛⲁ̅ ⲁⲩ‐ <text:line-break/><text:span text:style-name="T1"> </text:span><text:span text:style-name="T2">(6/27) </text:span> ⲱ ⲁϥⲁϩⲉⲣⲁⲧϥ ⲙ̅ⲡⲉϥⲙ̣̅ⲧⲟ ⲉⲃⲟⲗ ⲉϥϣⲟⲩⲟ <text:line-break/><text:span text:style-name="T1"> </text:span><text:span text:style-name="T2">(6/28) </text:span> ⲉϫⲱϥ ϩⲛ̅ ⲧ̣[ⲟ]ⲩ[ⲛ]ⲟⲩ ⲇ[ⲉ] ⲛ̅ⲧⲁⲣⲉϥϫⲓ ⲉⲃⲟⲗ ϩⲓ‐ <text:line-break/><text:span text:style-name="T1"> </text:span><text:span text:style-name="T2">(6/29) </text:span> ⲧⲛ̅ ⲡⲉⲡ̣[ⲛ̅ⲁ̅ ⲁϥ]ϯ ⲉ̣[ⲟ]ⲟⲩ ⲙ̅ⲡⲉⲡⲛ̅ⲁ̅ ⲉⲧⲟⲩⲁⲁⲃ <text:line-break/><text:span text:style-name="T1"> </text:span><text:span text:style-name="T2">(6/30) </text:span> ⲁⲩⲱ ⲧⲉⲡⲣⲟ̣[ⲛⲟⲓ]ⲁ̣ ⲉ̣[ⲧϫ]ⲏⲕ ⲉⲃⲟⲗ {ϩⲓⲧⲛ̅ ⲡⲉⲡ̅ⲛ̅ⲁ̅ <text:line-break/><text:span text:style-name="T1"> </text:span><text:span text:style-name="T2">(6/31) </text:span> ⲁϥϯ ⲉⲟⲟⲩ ⲙ̅ⲡⲉ̣[ⲡ̅ⲛ̅ⲁ̅ ⲉ]ⲧⲟⲩⲁⲁⲃ· ⲁⲩⲱ ⲧⲉⲡⲣⲟ‐ <text:line-break/><text:span text:style-name="T1"> </text:span><text:span text:style-name="T2">(6/32) </text:span> ⲛⲟⲓⲁ’ ⲉⲧϫⲏⲕ ⲉ[ⲃⲟ]ⲗ} ⲧⲁ[ⲓ̈ ⲉ]ⲧⲁ̣ϥϭⲱⲗⲡ ⲉⲃⲟⲗ <text:line-break/><text:span text:style-name="T1"> </text:span><text:span text:style-name="T2">(6/33) </text:span> ⲉⲧⲃⲏⲧⲥ̅ ⲁⲩⲱ ⲁϥⲣ̅ⲁⲓⲧⲉⲓ ⲉⲧⲛ̅ ⲛⲁϥ ⲛ̅ⲟⲩϣⲃ̅ⲣ̅‐ <text:line-break/><text:span text:style-name="T1"> </text:span><text:span text:style-name="T2">(6/34) </text:span> ⲣ̅ ϩⲱⲃ ⲉⲧⲉ ⲡⲛⲟⲩⲥ ⲡⲉ ⲁⲩⲱ ⲁϥⲉⲓⲱⲣⲙ ϩⲙ̅ <text:line-break/><text:span text:style-name="T1"> </text:span><text:span text:style-name="T2">(6/35) </text:span> [ⲡ]ⲧ̣ⲣⲉϥⲉⲓ̣[ⲱⲣ]ⲙ̣ⲉ ⲇⲉ ⲛ̅ϭⲓ ⲡⲁϩⲟⲣⲁⲧⲟⲛ ⲙ̅ⲡ̅ⲛ̅ⲁ̅ <text:line-break/><text:span text:style-name="T1"> </text:span><text:span text:style-name="T2">(7/1) </text:span> ⲁϥϭⲱⲗⲡ’ ⲉⲃⲟⲗ ⲛ̅ϭⲓ ⲡⲛⲟⲩⲥ ⲁⲩⲱ ⲁϥⲁϩⲉ‐ <text:line-break/><text:span text:style-name="T1"> </text:span><text:span text:style-name="T2">(7/2) </text:span> ⲉⲣⲁⲧϥ ⲙⲛ̅ ⲡ̣ⲉⲭⲣ̅ⲥ̅ ⲉϥϯ ⲉⲟⲟⲩ ⲛⲁϥ ⲙⲛ̅‐ <text:line-break/><text:span text:style-name="T1"> </text:span><text:span text:style-name="T2">(7/3) </text:span> ⲧⲃⲁⲣⲃⲏⲗⲱ̣ ⲛⲁⲓ̈ ⲇⲉ ⲧⲏⲣⲟⲩ ⲉⲧⲁϩϣⲱⲡⲉ <text:line-break/><text:span text:style-name="T1"> </text:span><text:span text:style-name="T2">(7/4) </text:span> ϩⲛ̅ ⲟⲩⲙ̅ⲛ̅ⲧ̅ⲕⲁⲣⲱϥ ⲁⲩⲱ ⲡⲙⲉⲉⲩⲉ· ⲁϥⲟⲩ‐ <text:line-break/><text:span text:style-name="T1"> </text:span><text:span text:style-name="T2">(7/5) </text:span> ⲱϣⲉ ϩⲓⲧⲛ̅ ⲡϣⲁϫⲉ ⲙ̅ⲡⲁϩⲟⲣⲁⲧⲟⲛ ⲙ̅ⲡⲛ̅ⲁ̅ <text:line-break/><text:span text:style-name="T1"> </text:span><text:span text:style-name="T2">(7/6) </text:span> ⲉⲧⲁⲙⲓⲟ ⲛ̅ⲟⲩϩⲱⲃ ⲁⲩⲱ ⲡⲉϥⲟⲩⲱϣ ⲁϥϣⲱ‐ <text:line-break/><text:span text:style-name="T1"> </text:span><text:span text:style-name="T2">(7/7) </text:span> ⲡⲉ ⲛ̅ⲟⲩⲉⲣⲅⲟⲛ ⲁⲩⲱ ⲁϥϭⲱⲗⲡ ⲉⲃⲟⲗ ⲙⲛ̅‐ <text:line-break/><text:span text:style-name="T1"> </text:span><text:span text:style-name="T2">(7/8) </text:span> ⲡⲛⲟⲩⲥ ⲁⲩⲱ ⲡⲟⲩⲟⲉⲓⲛ ⲉϥϯ ⲉⲟⲟⲩ ⲛⲁϥ <text:line-break/><text:span text:style-name="T1"> </text:span><text:span text:style-name="T2">(7/9) </text:span> ⲁⲩⲱ ⲡϣⲁϫⲉ ⲁϥⲟ̣ⲩ̣ⲁϩϥ ⲛ̅ⲥⲁ ⲡⲟⲩⲱϣⲉ <text:line-break/><text:span text:style-name="T1"> </text:span><text:span text:style-name="T2">(7/10) </text:span> ⲉⲧⲃⲉ ⲡϣⲁϫⲉ ⲅⲁⲣ ⲁϥⲧⲁ̣ⲙⲓⲟ ⲙ̅ⲡⲧⲏⲣϥ ⲛ̅‐ <text:line-break/><text:span text:style-name="T1"> </text:span><text:span text:style-name="T2">(7/11) </text:span> ϭⲓ ⲡⲉⲭ̅ⲥ̅ ⲡⲁⲩⲧⲟⲅⲉⲛ[ⲏ]ⲥ ⲛ̅ⲛⲟⲩⲧⲉ ⲡⲱⲛϩ <text:line-break/><text:span text:style-name="T1"> </text:span><text:span text:style-name="T2">(7/12) </text:span> ⲇⲉ ϣⲁ ⲉⲛⲉϩ ϩⲙ̅ ⲡⲉϥⲟ̣ⲩⲱϣ ⲁⲩⲱ ⲡⲛⲟⲩ̣[ⲥ] <text:line-break/><text:span text:style-name="T1"> </text:span><text:span text:style-name="T2">(7/13) </text:span> ⲙⲛ̅ ⲧⲡⲣⲟⲅⲛⲱⲥⲓⲥ ⲁⲩⲁϩⲉⲣⲁⲧⲟⲩ ⲁⲩϯ ⲉ̣[ⲡ]‐ <text:line-break/><text:span text:style-name="T1"> </text:span><text:span text:style-name="T2">(7/14) </text:span> ⲟⲩ ⲙ̅ⲡⲁϩⲟⲣⲁⲧⲟⲛ ⲙ̣̅ⲡⲛ̅ⲁ̅ ⲙⲛ̅ ⲧⲃⲁ̅ⲣⲃⲏⲗ̣[ⲱ̅] <text:line-break/><text:span text:style-name="T1"> </text:span><text:span text:style-name="T2">(7/15) </text:span> ϫⲉ ⲉⲧⲃⲏⲧⲥ̅ ⲅⲁⲣ ⲁⲩϣⲱⲡⲉ ⲁⲩⲱ ⲁϥϫⲱⲕ’ <text:line-break/><text:span text:style-name="T1"> </text:span><text:span text:style-name="T2">(7/16) </text:span> ⲉⲃⲟⲗ ⲛ̅ϭⲓ ⲡⲉⲡ̅ⲛ̅ⲁ̅ ⲉⲧⲟⲩⲁⲁⲃ ⲙ̅ⲡⲁⲩⲧⲟ̣‐ <text:line-break/><text:span text:style-name="T1"> </text:span><text:span text:style-name="T2">(7/17) </text:span> ⲅⲉⲛⲏⲥ ⲛ̅ⲛⲟⲩⲧⲉ ⲡⲉϥ̣ϣⲏⲣⲉ ⲙⲛ̅ ⲧⲃ̅ⲁ̅ⲣ̅ⲃ̅ⲏ̣̅̅[̅ⲗ̅ⲱ̅] <text:line-break/><text:span text:style-name="T1"> </text:span><text:span text:style-name="T2">(7/18) </text:span> ⲁⲧⲣⲉϥⲁϩⲉⲣⲁⲧϥ̅ ⲉⲡⲛⲟϭ [ⲁ]ⲩ̣ⲱ ⲡⲁϩⲟⲣ[ⲁ]‐ <text:line-break/><text:span text:style-name="T1"> </text:span><text:span text:style-name="T2">(7/19) </text:span> ⲧⲟⲥ ⲙ̅ⲡⲁⲣⲑⲉ̣ⲛⲓⲕⲟⲛ ⲙ̣̅[ⲡ̅]̅ⲛ̅ⲁ̅ ⲙ̅ⲡⲁⲩⲧⲟ‐ <text:line-break/><text:span text:style-name="T1"> </text:span><text:span text:style-name="T2">(7/20) </text:span> ⲅⲉⲛⲏⲥ ⲛ̅ⲛ̅ⲟⲩⲧⲉ̣ [ⲡ]ⲉⲭ̅ⲥ̣̅ [ⲡ]ⲁⲉⲓ ⲉⲛⲧⲁϥⲧⲁ‐ <text:line-break/><text:span text:style-name="T1"> </text:span><text:span text:style-name="T2">(7/21) </text:span> ⲉⲓⲟϥ ϩⲛ̅ ⲟⲩⲛⲟϭ ⲛ̅ⲥⲙⲏ ⲁ̣ϥ̣ⲟⲩⲱⲛϩ ⲉⲃⲟⲗ <text:line-break/><text:soft-page-break/><text:span text:style-name="T1"> </text:span><text:span text:style-name="T2">(7/22) </text:span> ϩⲓⲧⲛ̅ ⲧⲡⲣⲟⲛ̣ⲟ̣ⲓⲁ ⲁⲩⲱ [ⲁ]ϥⲕⲱ ⲛ̅ϭⲓ ⲡⲁϩⲟ̣‐ <text:line-break/><text:span text:style-name="T1"> </text:span><text:span text:style-name="T2">(7/23) </text:span> ⲣⲁⲧⲟⲛ ⲙ̅ⲡⲁⲣ̣ⲑⲉⲛⲓⲕⲟⲛ̣ ⲙ̅ⲡⲛ̅ⲁ̅ ⲙ̅ⲡⲁⲩ‐ <text:line-break/><text:span text:style-name="T1"> </text:span><text:span text:style-name="T2">(7/24) </text:span> ⲧⲟⲅⲉⲛⲏⲥ ⲛ̅ⲛⲟⲩⲧⲉ ⲙ̅ⲙⲟϥ ⲁϫⲙ̅ ⲡⲧⲏⲣϥ <text:line-break/><text:span text:style-name="T1"> </text:span><text:span text:style-name="T2">(7/25) </text:span> ⲁⲩⲱ ⲁϥⲣ̅ϩⲩⲡ̣ⲟ̣ⲧⲁ̣ⲥⲥⲉ ⲛⲁϥ ⲛ̅ⲧⲉⲝⲟⲩⲥⲓⲁ <text:line-break/><text:span text:style-name="T1"> </text:span><text:span text:style-name="T2">(7/26) </text:span> ⲧⲏⲣⲥ̅ ⲁⲩⲱ ⲧⲙⲉ ⲧⲁⲓ̈ ⲉⲧϣ̣ⲟⲟ̣ⲡ̣ ⲛ̅ϩⲏⲧϥ̅ <text:line-break/><text:span text:style-name="T1"> </text:span><text:span text:style-name="T2">(7/27) </text:span> ϫⲉⲕⲁⲁⲥ ⲉϥⲛⲁⲙ̅ⲙⲉ ⲁⲡⲧⲏⲣϥ ⲡⲁⲓ̈ ⲉⲛ‐ <text:line-break/><text:span text:style-name="T1"> </text:span><text:span text:style-name="T2">(7/28) </text:span> ⲧⲁⲩⲙⲟⲩⲧⲉ ⲉⲣⲟϥ ⲛ̅ⲟ̣[ⲩ]ⲣ̣[ⲁⲛ] ⲉ̣ϥϫⲟⲥⲉ ⲉ‐ <text:line-break/><text:span text:style-name="T1"> </text:span><text:span text:style-name="T2">(7/29) </text:span> ⲣⲁⲛ ⲛⲓⲙ ⲡⲣⲁⲛ ⲅⲁⲣ ⲉ̣[ⲧⲙ̅ⲙⲁⲩ ⲥ]ⲉⲛⲁϫⲟⲟϥ <text:line-break/><text:span text:style-name="T1"> </text:span><text:span text:style-name="T2">(7/30) </text:span> ⲁⲛⲉⲧⲙ̅ⲡϣⲁ ⲙ̅ⲙⲟϥ ⲉ̣ⲃ̣[ⲟ]ⲗ̣ ⲅⲁⲣ ϩⲙ̅ ⲡⲟⲩⲟ‐ <text:line-break/><text:span text:style-name="T1"> </text:span><text:span text:style-name="T2">(7/31) </text:span> ⲉⲓⲛ ⲉⲧⲉ ⲡⲁⲓ̈ ⲡⲉ ⲡⲉⲭ̣̅̅ⲣ̅ⲥ̅ ⲁⲩⲱ ⲧⲙ̅ⲛ̅ⲧⲁⲧ‐ <text:line-break/><text:span text:style-name="T1"> </text:span><text:span text:style-name="T2">(7/32) </text:span> ⲧⲉⲕⲟ ϩⲓⲧⲛ̅ ⲡϯ ⲙ̅ⲡⲉ̣ⲡ̅ⲛ̅ⲁ̅ ⲙ̅ⲡⲓϥⲧⲟⲟⲩ <text:line-break/><text:span text:style-name="T1"> </text:span><text:span text:style-name="T2">(7/33) </text:span> ⲙ̅ⲫⲱⲥⲧⲏⲣ ⲉⲃⲟⲗ ϩⲙ̅ ⲡⲓⲁⲩⲧⲟⲅⲉⲛⲏⲥ <text:line-break/><text:span text:style-name="T1"> </text:span><text:span text:style-name="T2">(7/34) </text:span> ⲛ̅ⲛⲟⲩⲧⲉ ⲁϥϭⲱϣⲧ ⲉⲃⲟⲗ ⲁⲧⲣⲟⲩⲱϩⲉ̣ <text:line-break/><text:span text:style-name="T1"> </text:span><text:span text:style-name="T2">(8/1) </text:span> ⲉⲣⲁⲧⲟⲩ ⲉⲣⲟϥ ⲡϣⲟⲙⲧ ⲇⲉ ⲡⲟⲩⲱϣⲉ <text:line-break/><text:span text:style-name="T1"> </text:span><text:span text:style-name="T2">(8/2) </text:span> ⲧⲉⲛⲛⲟⲓⲁ· ⲁⲩⲱ ⲡⲱⲛϩ· ⲧⲉϥ̣ⲧⲟⲉ ⲇⲉ ⲛ̅‐ <text:line-break/><text:span text:style-name="T1"> </text:span><text:span text:style-name="T2">(8/3) </text:span> ϭⲟⲙ ⲧⲙ̅ⲛ̅ⲧ̅ⲣⲙⲛ̅ϩⲏⲧ· ⲧⲭⲁⲣⲓⲥ· ⲧⲉⲥⲑⲏⲥⲓⲥ <text:line-break/><text:span text:style-name="T1"> </text:span><text:span text:style-name="T2">(8/4) </text:span> ⲧⲫⲣⲟⲛⲏⲥⲉⲓⲥ ⲧⲭⲁⲣⲓⲥ ⲇⲉ ⲉⲥϣⲟⲟⲡ ϩⲁ <text:line-break/><text:span text:style-name="T1"> </text:span><text:span text:style-name="T2">(8/5) </text:span> ϩⲧⲛ̅ ⲡⲁⲓⲱⲛ ⲙ̅ⲫⲱⲥⲧⲏⲣ ⲁⲣⲙⲟⲍⲏⲗ ⲉⲧⲉ <text:line-break/><text:span text:style-name="T1"> </text:span><text:span text:style-name="T2">(8/6) </text:span> ⲡⲁⲓ̈ ⲡⲉ ⲡϣⲟⲣⲡ’ ⲛ̅ⲁⲅⲅⲉⲗⲟⲥ ⲡⲓⲁⲓⲱⲛ ⲇⲉ <text:line-break/><text:span text:style-name="T1"> </text:span><text:span text:style-name="T2">(8/7) </text:span> ⲥⲉⲛ̅ⲛⲉⲙⲁϥ’ ⲛ̅ϭⲓ ⲕⲉϣⲟⲙⲧ ⲛ̅ⲁⲓⲱⲛ ⲧⲭⲁ‐ <text:line-break/><text:span text:style-name="T1"> </text:span><text:span text:style-name="T2">(8/8) </text:span> ⲣⲓⲥ· ⲧⲙⲏⲉ· ⲧⲙⲟⲣⲫⲏ· ⲡⲙⲉϩⲥⲛⲁⲩ ⲇⲉ ⲙ̅‐ <text:line-break/><text:span text:style-name="T1"> </text:span><text:span text:style-name="T2">(8/9) </text:span> ⲫⲱⲥⲧⲏⲣ ⲱⲣⲓⲏⲗ ⲡ̣ⲉⲛⲧⲁⲩⲥⲉϩⲱϥ ⲉⲣⲁⲧϥ <text:line-break/><text:span text:style-name="T1"> </text:span><text:span text:style-name="T2">(8/10) </text:span> ⲉϫⲙ̅ ⲡⲙⲉϩⲥⲛⲁ̣ⲩ ⲛ̅ⲁⲓⲱⲛ ⲥⲉⲛ̅ⲛⲉⲙⲁϥ ⲇⲉ <text:line-break/><text:span text:style-name="T1"> </text:span><text:span text:style-name="T2">(8/11) </text:span> ⲛ̅ϭⲓ ⲕⲉϣⲟⲙⲧ ⲛ̣̅ⲁⲓⲱⲛ ⲧⲉⲡⲓⲛⲟⲓⲁ ⲧⲉⲥⲑⲏ‐ <text:line-break/><text:span text:style-name="T1"> </text:span><text:span text:style-name="T2">(8/12) </text:span> ⲥ̣ⲓⲥ· ⲡⲣ̅ⲡⲙⲉⲉⲩⲉ ⲡⲙⲁϩϣⲟⲙⲧ ⲇⲉ ⲙ̅ⲫⲱ‐ <text:line-break/><text:span text:style-name="T1"> </text:span><text:span text:style-name="T2">(8/13) </text:span> [ⲥ]ⲧ̣ⲏⲣ ⲡⲉ ⲇ̅ⲁ̅ⲩ̅ⲉ̅ⲓ̅ⲑ̅ⲁ̅ⲓ̅ ⲡⲁⲓ̈ ⲉⲛⲧⲁⲩⲥⲉ ϩⲱϥ ⲉ‐ <text:line-break/><text:span text:style-name="T1"> </text:span><text:span text:style-name="T2">(8/14) </text:span> ⲣⲁⲧϥ ⲉϫⲙ̅ ⲡⲙⲉϩϣ̣ⲟⲙⲧ ⲛ̅ⲁⲓⲱⲛ ⲥⲉⲛ̅ⲛⲉ‐ <text:line-break/><text:span text:style-name="T1"> </text:span><text:span text:style-name="T2">(8/15) </text:span> ⲙⲁϥ ⲇⲉ ⲛ̅ϭⲓ ⲕⲉϣⲟⲙⲧ ⲛ̅ⲁⲓⲱⲛ ⲧⲙ̅ⲛ̅ⲧ̅ⲣⲙ̅‐ <text:line-break/><text:span text:style-name="T1"> </text:span><text:span text:style-name="T2">(8/16) </text:span> ⲛ̅ϩⲏⲧ ⲧⲁⲅⲁⲡⲏ· ϯ̣ⲇ̣ⲉⲁ· ⲡⲙⲁϩϥⲧⲟⲟⲩ ⲇⲉ <text:line-break/><text:span text:style-name="T1"> </text:span><text:span text:style-name="T2">(8/17) </text:span> ⲛ̣̅ⲁⲓⲱⲛ ⲁⲩⲧⲉϩⲟ̣ϥ ⲉⲣⲁⲧϥ ⲉϫⲙ̅ ⲡⲙⲉϩ‐ <text:line-break/><text:span text:style-name="T1"> </text:span><text:span text:style-name="T2">(8/18) </text:span> ϥ̣ⲧⲟⲟⲩ ⲙ̅ⲫ̣ⲱ̣ⲥⲧⲏⲣ ⲏ̅ⲗ̅ⲏ̅ⲗ̅ⲏ̅ⲑ̅ ⲥⲉⲛ̅ⲛⲉⲙⲁϥ <text:line-break/><text:span text:style-name="T1"> </text:span><text:span text:style-name="T2">(8/19) </text:span> ⲇⲉ ⲛ̅ϭ̅ⲓ ⲕⲉ[ϣ]ⲟ̣ⲙⲧ ⲛ̅ⲁ̣̅ⲓ̣ⲱⲛ ⲡϫⲱⲕ ⲉⲃⲟⲗ <text:line-break/><text:span text:style-name="T1"> </text:span><text:span text:style-name="T2">(8/20) </text:span> ϯⲣⲏⲛⲏ ⲧⲥ̣[ⲟ]ⲫⲓⲁ ⲛⲁ̣ⲓ̈ ⲛⲉ ⲛϥⲧⲟⲟⲩ ⲙ̅ⲫⲱ‐ <text:line-break/><text:span text:style-name="T1"> </text:span><text:span text:style-name="T2">(8/21) </text:span> ⲥⲧⲏⲣ ⲉⲧⲁϩⲉⲣ̣ⲁⲧⲟⲩ ⲁⲡⲁⲩⲧⲟⲅⲉⲛⲏⲥ ⲛ̅ⲛⲟⲩⲧⲉ <text:line-break/><text:span text:style-name="T1"> </text:span><text:span text:style-name="T2">(8/22) </text:span> ⲛⲁⲓ̈ ⲛⲉ ⲡⲙ̅ⲛ̅ⲧ̣̅̅ⲥ̣ⲛⲟⲟⲩⲥ ⲛ̅ⲁⲓⲱⲛ ⲉⲧⲁϩⲉⲣⲁⲧⲟⲩ <text:line-break/><text:span text:style-name="T1"> </text:span><text:span text:style-name="T2">(8/23) </text:span> ⲁⲡϣⲏⲣⲉ ⲙ̅ⲡⲛⲟϭ ⲡⲁⲩⲧ̣ⲟⲅⲉⲛⲏⲥ ⲡⲉⲭⲣ̅ⲥ̅ <text:line-break/><text:span text:style-name="T1"> </text:span><text:span text:style-name="T2">(8/24) </text:span> ϩⲓⲧⲛ̅ ⲡⲟⲩⲱϣⲉ ⲙⲛ̅ ⲡϯ ⲙ̅ⲡⲁϩⲟⲣⲁⲧⲟⲥ ⲙ̅‐ <text:line-break/><text:span text:style-name="T1"> </text:span><text:span text:style-name="T2">(8/25) </text:span> ⲡ̅ⲛ̅ⲁ̅ ⲡⲓⲙ̅ⲛⲧ̅ⲥⲛⲟⲟⲩⲥ̣ [ⲇ]ⲉ ⲛ̅ⲁⲓⲱⲛ ⲛ̅ⲛⲁ <text:line-break/><text:span text:style-name="T1"> </text:span><text:span text:style-name="T2">(8/26) </text:span> ⲡϣⲏⲣⲉ ⲙ̅ⲡ[ⲁ]ⲩⲧⲟⲅⲉⲛⲏⲥ ⲛⲉ ⲁⲩⲱ ⲛ̅ⲧⲁⲡⲧⲏⲣϥ <text:line-break/><text:span text:style-name="T1"> </text:span><text:span text:style-name="T2">(8/27) </text:span> ⲧⲁϫⲣⲟ ϩⲣⲁⲓ̈ ϩⲙ̅ ⲡⲟⲩⲱϣ ⲙ̅ⲡⲉⲡ̅ⲛ̅ⲁ̅ ⲉⲧⲟⲩ‐ <text:line-break/><text:span text:style-name="T1"> </text:span><text:span text:style-name="T2">(8/28) </text:span> ⲁⲁⲃ ⲉⲃⲟ̣[ⲗ ϩ]ⲓ̣ⲧ̣[ⲙ̅] ⲡⲁⲩⲧⲟⲅⲉⲛⲏⲥ ⲉⲃⲟⲗ ⲇⲉ <text:line-break/><text:span text:style-name="T1"> </text:span><text:span text:style-name="T2">(8/29) </text:span> ϩⲛ̅ ⲧⲡⲣ̣[ⲟⲅⲛⲱⲥⲓ]ⲥ ⲙ̅ⲡⲛⲟⲩⲥ ⲛ̅ⲧⲉⲗⲉⲓⲟⲥ <text:line-break/><text:span text:style-name="T1"> </text:span><text:span text:style-name="T2">(8/30) </text:span> ϩⲓⲧⲙ̅ ⲡϭⲱ̣[ⲗⲡ ⲉ]ⲃⲟⲗ ⲙ̅ⲡⲟⲩⲱϣ ⲙ̅ⲡⲁϩⲟ‐ <text:line-break/><text:span text:style-name="T1"> </text:span><text:span text:style-name="T2">(8/31) </text:span> ⲣⲁⲧⲟⲥ ⲙ̅ⲡ̅ⲛ̅ⲁ̅ ⲁⲩⲱ ⲡⲟⲩⲱϣⲉ ⲙ̅ⲡⲁⲩⲧⲟⲅⲉ‐ <text:line-break/><text:span text:style-name="T1"> </text:span><text:span text:style-name="T2">(8/32) </text:span> ⲛⲏⲥ ⲛ̅ⲣⲱⲙⲉ ⲛ̅ⲧⲉⲗⲉⲓⲟ̣ⲥ ⲡϣⲟⲣⲡ ⲟⲩⲱⲛϩ <text:line-break/><text:span text:style-name="T1"> </text:span><text:span text:style-name="T2">(8/33) </text:span> ⲉⲃⲟⲗ· ⲁⲩⲱ ⲡⲙⲉⲉ· ⲡⲉⲧⲁϥⲙⲟⲩⲧⲉ ⲉⲣⲟϥ <text:line-break/><text:span text:style-name="T1"> </text:span><text:span text:style-name="T2">(8/34) </text:span> ⲛ̅ϭⲓ ⲡⲡⲁⲣⲑⲉⲛⲓⲕⲟⲛ ⲙ̅ⲡⲛ̅ⲁ̅ ϫⲉ ⲡ̅ⲓⲅⲉⲣⲁ̅‐ <text:line-break/><text:soft-page-break/><text:span text:style-name="T1"> </text:span><text:span text:style-name="T2">(8/35) </text:span> ⲁ̣̅̅ⲇ̅ⲁ̅ⲙ̅ⲁ̅ⲛ̅ ⲁⲩⲱ ⲁϥⲥⲉϩⲱϥ ⲉⲣⲁⲧϥ ⲁϫⲛ̅ <text:line-break/><text:span text:style-name="T1"> </text:span><text:span text:style-name="T2">(9/1) </text:span> ⲡϣⲟⲣⲡ’ ⲛ̅ⲁⲓⲱⲛ ⲙⲛ̅ ⲡⲛⲟϭ ⲡⲁⲩⲧⲟⲅⲉⲛⲏⲥ <text:line-break/><text:span text:style-name="T1"> </text:span><text:span text:style-name="T2">(9/2) </text:span> ⲡⲉⲭⲥ̅ ϩⲁϩⲧⲛ̅ ⲡϣⲟⲣⲡ’ ⲙ̅ⲫⲱⲥⲧⲏⲣ’ ⲁⲣ̅ⲙ̅ⲟ̅‐ <text:line-break/><text:span text:style-name="T1"> </text:span><text:span text:style-name="T2">(9/3) </text:span> ⲍ̅ⲏ̅ⲗ̅ ⲁⲩⲱ ⲉⲩϣⲟⲟⲡ’ ⲛⲙ̅ⲙⲁϥ ⲛ̅ϭⲓ ⲛⲉϥϭⲟⲙ <text:line-break/><text:span text:style-name="T1"> </text:span><text:span text:style-name="T2">(9/4) </text:span> ⲁⲩⲱ ⲁϥϯ ⲛⲁϥ ⲛ̅ϭⲓ ⲡⲁϩⲟⲣⲁⲧⲟⲛ ⲛ̅ⲛⲟⲩϭⲟⲙ <text:line-break/><text:span text:style-name="T1"> </text:span><text:span text:style-name="T2">(9/5) </text:span> ⲛ̅ⲛⲟⲉⲣⲟⲛ ⲛ̅ⲛⲁⲧϭⲣⲟ ⲉⲣⲟⲥ ⲁⲩⲱ ⲁϥϫⲟⲟⲥ <text:line-break/><text:span text:style-name="T1"> </text:span><text:span text:style-name="T2">(9/6) </text:span> ⲁϥϯ ⲉⲟⲟⲩ ⲁⲩⲱ ⲁϥⲥⲙⲟⲩ ⲁⲡⲁϩⲟⲣⲁⲧⲟⲛ ⲙ̅‐ <text:line-break/><text:span text:style-name="T1"> </text:span><text:span text:style-name="T2">(9/7) </text:span> ⲡⲛ̅ⲁ̅ ⲉϥϫⲱ ⲙ̅ⲙⲟⲥ ϫⲉ ⲉⲧⲃⲏⲧⲕ ⲁⲡⲧⲏⲣϥ <text:line-break/><text:span text:style-name="T1"> </text:span><text:span text:style-name="T2">(9/8) </text:span> ϣⲱⲡⲉ ⲁⲩⲱ ⲉⲣⲉⲡⲧⲏⲣϥ ⲛⲁⲛⲁⲩϩϥ ⲉⲣⲟⲕ <text:line-break/><text:span text:style-name="T1"> </text:span><text:span text:style-name="T2">(9/9) </text:span> ⲁⲛⲟⲕ’ ⲇⲉ ϯⲛⲁⲥⲙⲟⲩ ⲛ̅ⲧⲁϯ ⲉⲟⲟⲩ ⲛⲁⲕ ⲁⲩⲱ <text:line-break/><text:span text:style-name="T1"> </text:span><text:span text:style-name="T2">(9/10) </text:span> ⲡⲁⲩⲧⲟⲅⲉⲛⲏⲥ ⲙⲛ̅ ⲛⲁⲓⲱⲛ ⲡⲓϣⲟⲙⲧ ⲡⲓⲱⲧ’ <text:line-break/><text:span text:style-name="T1"> </text:span><text:span text:style-name="T2">(9/11) </text:span> ⲧⲙⲁⲩ· ⲡϣⲏⲣⲉ ⲧϭⲟⲙ ⲛ̅ⲧⲉⲗⲉⲓⲟⲥ ⲁⲩⲱ ⲁϥ‐ <text:line-break/><text:span text:style-name="T1"> </text:span><text:span text:style-name="T2">(9/12) </text:span> ⲧⲉϩⲟ ⲉⲣⲁⲧϥ ⲙ̅ⲡⲉϥϣⲏⲣⲉ ⲥⲏⲑ· ⲁϫⲛ̅ ⲡⲙⲁϩ‐ <text:line-break/><text:span text:style-name="T1"> </text:span><text:span text:style-name="T2">(9/13) </text:span> ⲥⲛⲟ ⲛ̅ⲁⲓⲱⲛ ⲛⲁϩⲣⲛ̅ ⲡⲙⲁϩⲥⲛⲟ ⲙ̅ⲫⲱⲥ̣ⲧ̣ⲏ̣ⲣ̣ <text:line-break/><text:span text:style-name="T1"> </text:span><text:span text:style-name="T2">(9/14) </text:span> ⲱ̅ⲣ̅ⲱ̅ⲓ̅̈̅ⲏ̅ⲗ̅ ϩⲣⲁⲓ̈ ⲇⲉ ϩⲙ̅ ⲡⲙⲁϩϣⲟⲙⲧ’ ⲛ̅[ⲁⲓ]ⲱ̣ⲛ <text:line-break/><text:span text:style-name="T1"> </text:span><text:span text:style-name="T2">(9/15) </text:span> ⲁⲩⲧⲉϩⲟ ⲇⲉ ⲉⲣⲁⲧϥ ⲙ̅ⲡⲉⲥⲡⲉⲣⲙⲁ ⲛ̅ⲥⲏⲑ ⲁ‐ <text:line-break/><text:span text:style-name="T1"> </text:span><text:span text:style-name="T2">(9/16) </text:span> ϫⲛ̅ ⲡⲙⲁϩϣⲟⲙⲧ ⲙ̅ⲫⲱⲥⲧⲏⲣ ⲇⲁ̅ⲩ̅ⲉ̅ⲓ̅ⲑ̅ⲁ̣̅̅[ⲓ] <text:line-break/><text:span text:style-name="T1"> </text:span><text:span text:style-name="T2">(9/17) </text:span> ⲁⲩⲧⲉϩⲟ ⲇⲉ ⲉⲣⲁⲧϥ ⲛⲙ̅ⲯⲩⲭⲏ ⲛ̅ⲛⲉⲧⲟⲩⲁ[ⲁ]ⲃ̣ <text:line-break/><text:span text:style-name="T1"> </text:span><text:span text:style-name="T2">(9/18) </text:span> ⲛ̅ϩⲣⲁⲓ̈ ⲇⲉ ϩⲙ̅ ⲡⲙⲉϩϥⲧⲟⲟⲩ ⲛ̅ⲁⲓⲱⲛ ⲁⲩⲧⲉϩⲟ̣ <text:line-break/><text:span text:style-name="T1"> </text:span><text:span text:style-name="T2">(9/19) </text:span> ⲉⲣⲁⲧⲟⲩ ⲛⲙ̅ⲯⲩⲭⲏ ⲛ̅ⲛⲉ̣[ⲧ]ⲟ ⲛ̅ⲁⲧⲥⲟⲟⲩⲛ ⲁⲡ‐ <text:line-break/><text:span text:style-name="T1"> </text:span><text:span text:style-name="T2">(9/20) </text:span> ⲡⲗⲏⲣⲱⲙⲁ· ⲁⲩⲱ ⲙ̅ⲡ̣ⲟⲩⲣ̣̅ⲙ̣ⲉⲧⲁⲛⲟⲉⲓ ϩⲛ̅ ⲟⲩ‐ <text:line-break/><text:span text:style-name="T1"> </text:span><text:span text:style-name="T2">(9/21) </text:span> ϭⲉⲡⲏ ⲁⲗⲗⲁ ⲁⲩϭⲱ ϩⲛ̅ ⲟⲩⲟⲉⲓϣ ⲁⲩⲱ ⲙⲛ̅ⲛ̅‐ <text:line-break/><text:span text:style-name="T1"> </text:span><text:span text:style-name="T2">(9/22) </text:span> ⲥⲱⲥ ⲁⲩⲙⲉⲧⲁⲛⲟⲉⲓ ⲁⲩϣⲱⲡⲉ ϩⲁϩⲧⲛ̅ ⲡⲙⲉϩ‐ <text:line-break/><text:span text:style-name="T1"> </text:span><text:span text:style-name="T2">(9/23) </text:span> ϥⲧⲟⲟⲩ ⲙ̅ⲫⲱ[ⲥ]ⲧ̣ⲏⲣ ⲏⲗ̅ⲏ̅ⲗ̅ⲏ̅ⲑ̅ ⲛⲁⲓ̈ ⲛⲉ ϩⲉⲛ‐ <text:line-break/><text:span text:style-name="T1"> </text:span><text:span text:style-name="T2">(9/24) </text:span> ϫⲡⲟ ⲛⲉ ⲉⲩϯ ⲉⲟⲟⲩ ⲙ̅ⲡⲁϩⲟⲣⲁⲧⲟⲛ ⲙ̅ⲡ̅ⲛ̅ⲁ̅ <text:line-break/><text:span text:style-name="T1"> </text:span><text:span text:style-name="T2">(9/25) </text:span> ⲧⲥⲟⲫⲓⲁ ⲇⲉ ⲛ̅ⲧⲉⲡⲓⲛⲟⲓⲁ· ⲉⲥϣⲟⲟⲡ’ ⲛ̅ⲁⲓⲱⲛ <text:line-break/><text:span text:style-name="T1"> </text:span><text:span text:style-name="T2">(9/26) </text:span> ⲁⲥⲙⲉⲉⲩⲉ ϩⲛ̅ ⲟⲩⲙⲉⲉⲩⲉ ⲉⲃⲟⲗ ⲛ̅ϩⲏⲧⲥ̅ ⲙⲛ̅‐ <text:line-break/><text:span text:style-name="T1"> </text:span><text:span text:style-name="T2">(9/27) </text:span> ⲧⲉⲛⲑⲩⲙⲏⲥⲓⲥ ⲙ̅ⲡⲁϩⲟⲣⲁⲧⲟⲛ ⲙ̅ⲡ̅ⲛ̅ⲁ̅ ⲁⲩⲱ <text:line-break/><text:span text:style-name="T1"> </text:span><text:span text:style-name="T2">(9/28) </text:span> ⲧⲡⲣⲟⲅⲛⲱⲥⲓⲥ ⲁⲥⲟⲩⲱ̣ϣ[ⲉ] ⲉ̣ⲟⲩⲱⲛϩ ⲉⲃⲟⲗ <text:line-break/><text:span text:style-name="T1"> </text:span><text:span text:style-name="T2">(9/29) </text:span> ⲛ̅ⲟⲩⲉⲓⲛⲉ ⲛ̅ϩⲏⲧⲥ̅ ⲁϫⲙ̣̅ [ⲡⲟⲩⲱ]ϣ ⲙ̅ⲡⲉⲡ̅ⲛ̅ⲁ̅ <text:line-break/><text:span text:style-name="T1"> </text:span><text:span text:style-name="T2">(9/30) </text:span> ⲙ̅ⲡⲉϥⲣ̅ⲉⲩⲇⲟⲕⲉⲓ ⲁⲩ[ⲱ ⲁϫⲙ̅ ⲡ]ⲉ̣ⲥϣⲃⲣ̅ ⲛ̅ϩⲱⲧⲣ̅ <text:line-break/><text:span text:style-name="T1"> </text:span><text:span text:style-name="T2">(9/31) </text:span> ⲁⲩⲱ ⲁϫⲙ̅ ⲡⲉϥⲙⲟⲕⲙⲉⲕ ⲉⲙⲡⲉϥⲣ̅ⲥⲩⲛⲉⲩ‐ <text:line-break/><text:span text:style-name="T1"> </text:span><text:span text:style-name="T2">(9/32) </text:span> ⲇⲟⲕⲉⲓ ⲇⲉ ⲛ̅ϭⲓ ⲡⲡⲣⲟⲥⲱⲡⲟⲛ ⲛ̅ⲧⲉⲥⲙ̅ⲛ̅ⲧ̅‐ <text:line-break/><text:span text:style-name="T1"> </text:span><text:span text:style-name="T2">(9/33) </text:span> ϩⲟⲟⲩⲧ ⲉⲙⲡⲉⲥϭⲓⲛⲉ ⲇⲉ ⲙ̅ⲡⲉⲥϫⲱⲛϥ <text:line-break/><text:span text:style-name="T1"> </text:span><text:span text:style-name="T2">(9/34) </text:span> ⲁⲥⲙⲟⲕⲙⲉⲕ ⲇⲉ ⲭⲱⲣⲓⲥ ⲡⲟⲩⲱϣ ⲙ̅ⲡⲉⲡ̅ⲛ̅ⲁ̅ <text:line-break/><text:span text:style-name="T1"> </text:span><text:span text:style-name="T2">(9/35) </text:span> ⲁⲩⲱ ⲡⲥⲟⲟⲩⲛ ⲙ̅ⲡⲉⲥϫⲱⲛϥ ⲁⲥⲉⲓⲛⲉ ⲉⲃⲟⲗ <text:line-break/><text:span text:style-name="T1"> </text:span><text:span text:style-name="T2">(10/1) </text:span> ⲉⲧⲃⲉ ⲧϭⲟⲙ ⲇⲉ ⲛ̅ⲁⲧϫⲣⲟ ⲉⲣⲟⲥ ⲉⲧⲛ̅ϩⲏⲧⲥ̅ <text:line-break/><text:span text:style-name="T1"> </text:span><text:span text:style-name="T2">(10/2) </text:span> ⲙ̅ⲡⲉⲡⲉⲥⲙⲉⲉⲩⲉ ϣⲱⲡⲉ ⲛ̅ⲁⲣⲅⲟⲛ ⲁⲩⲱ <text:line-break/><text:span text:style-name="T1"> </text:span><text:span text:style-name="T2">(10/3) </text:span> ⲁϥⲟⲩⲱⲛϩ ⲉⲃⲟⲗ ⲛ̅ϩⲏⲧⲥ̅ ⲛ̅ϭⲓ ⲟⲩϩⲱⲃ ⲛ̅‐ <text:line-break/><text:span text:style-name="T1"> </text:span><text:span text:style-name="T2">(10/4) </text:span> ⲁⲧϫⲱⲕ ⲁⲩⲱ ⲉϥϣⲃ̅ⲃⲓⲁⲉⲓⲧ ⲁⲡⲉⲥⲥⲙⲟⲧ <text:line-break/><text:span text:style-name="T1"> </text:span><text:span text:style-name="T2">(10/5) </text:span> ⲉⲃⲟⲗ ϫⲉ ⲁⲥⲧⲁⲙⲓⲟϥ ⲁϫⲙ̅ ⲡⲉⲥϣⲃⲣ̅ ⲛϩⲱⲧⲣ̅ <text:line-break/><text:span text:style-name="T1"> </text:span><text:span text:style-name="T2">(10/6) </text:span> ⲁⲩⲱ ⲛⲉ ⲟⲩⲁⲧⲥⲙⲟⲧ ⲡⲉ ⲁⲡⲉⲓⲛⲉ ⲛ̅ⲧⲉϥⲙⲁ‐ <text:line-break/><text:span text:style-name="T1"> </text:span><text:span text:style-name="T2">(10/7) </text:span> ⲁⲩ ⲁϥⲟ ⲛ̅ϭⲉⲙⲟⲣⲫⲏ ⲛ̅ⲧⲁⲣⲉⲥⲛⲁⲩ ⲇⲉ ⲁⲡⲉⲥ‐ <text:line-break/><text:span text:style-name="T1"> </text:span><text:span text:style-name="T2">(10/8) </text:span> ⲟⲩⲱϣⲉ ⲁϥϣⲱⲡⲉ ⲛ̅ⲟⲩⲧⲩⲡⲟⲥ ⲉϥϣⲃⲃⲓ <text:line-break/><text:span text:style-name="T1"> </text:span><text:span text:style-name="T2">(10/9) </text:span> ⲁⲉⲓⲧ ⲛ̅ⲇⲣⲁⲕⲱⲛ ⲛ̅ϩⲟ ⲙ̅ⲙⲟⲩⲉⲓ· ⲛⲉϥⲃⲁⲗ ⲇⲉ <text:line-break/><text:span text:style-name="T1"> </text:span><text:span text:style-name="T2">(10/10) </text:span> ⲛⲉⲩⲟ ⲛ̅ⲑⲉ ⲛ̅ⲛⲓⲕⲱϩⲧ ⲛ̅ϩⲃ̅ⲃⲣⲏϭⲉ ⲉⲩϯ <text:line-break/><text:span text:style-name="T1"> </text:span><text:span text:style-name="T2">(10/11) </text:span> ⲟⲩⲟⲉⲓⲛ ⲁⲥⲛⲟϫϥ̅ ϩⲓⲥⲁⲛⲃⲟⲗ ⲙ̅ⲙⲟⲥ ⲙ̅ⲡⲃⲟⲗ <text:line-break/><text:soft-page-break/><text:span text:style-name="T1"> </text:span><text:span text:style-name="T2">(10/12) </text:span> ⲛ̅ⲛ̅ⲧⲟⲡⲟⲥ ⲉⲧⲙ̅ⲙⲁⲩ ϫⲉⲕⲁⲁⲥ ⲛ̅ⲛⲉⲗⲁⲁⲩ <text:line-break/><text:span text:style-name="T1"> </text:span><text:span text:style-name="T2">(10/13) </text:span> ϩⲛ̅ ⲛⲁⲧⲙⲟⲩ ⲛⲁⲩ ⲉⲣⲟϥ’ ϫⲉ ⲛ̅ⲧⲁⲥⲧⲁⲙⲓⲟϥ ⲅⲁⲣ <text:line-break/><text:span text:style-name="T1"> </text:span><text:span text:style-name="T2">(10/14) </text:span> ϩⲛ̅ ⲟⲩⲙ̅ⲛ̅ⲧ̅ⲁⲧⲥⲟⲟⲩⲛ ⲁⲩⲱ ⲁⲥⲕⲧⲟ ⲉⲣⲟϥ ⲛ̅‐ <text:line-break/><text:span text:style-name="T1"> </text:span><text:span text:style-name="T2">(10/15) </text:span> ⲟ̣ⲩ̣ⲕⲗⲟⲟⲗⲉ ⲛ̅ⲟⲩⲟⲉⲓⲛ ⲁⲩⲱ ⲁⲥⲕⲱ ⲛ̅ⲟⲩⲑⲣⲟ‐ <text:line-break/><text:span text:style-name="T1"> </text:span><text:span text:style-name="T2">(10/16) </text:span> ⲛⲟⲥ ϩⲛ̅ ⲧⲙⲏⲧⲉ ⲛ̅ⲧⲉⲕⲗⲟⲟⲗⲉ ϫⲉⲕⲁⲁⲥ ⲛ̅ⲛⲉ <text:line-break/><text:span text:style-name="T1"> </text:span><text:span text:style-name="T2">(10/17) </text:span> ⲗⲁⲁⲩ ⲛⲁⲩ ⲉⲣⲟϥ ⲉⲓⲙⲏⲧⲓ ⲁⲡⲉⲡⲛ̅ⲁ̅ ⲉⲧⲟⲩⲁⲁⲃ <text:line-break/><text:span text:style-name="T1"> </text:span><text:span text:style-name="T2">(10/18) </text:span> ⲉⲧⲟⲩⲙⲟⲩⲧⲉ ⲉⲣⲟϥ ϫⲉ ⲧⲙⲁⲁⲩ ⲛ̅ⲛⲉⲧⲟⲛϩ <text:line-break/><text:span text:style-name="T1"> </text:span><text:span text:style-name="T2">(10/19) </text:span> ⲁⲥⲙⲟⲩⲧⲉ ⲇⲉ ⲉⲡⲉϥⲣⲁⲛ ϫⲉ ⲓ̅̈̅ⲁ̅ⲗ̅ⲧ̅ⲁ̅ⲃ̅ⲁ̅ⲱ̅ⲑ̅ ⲡⲁⲓ̈ <text:line-break/><text:span text:style-name="T1"> </text:span><text:span text:style-name="T2">(10/20) </text:span> ⲡⲉ ⲡϣⲟⲣⲡ ⲛ̅[ⲁⲣ]ⲭⲱⲛ ⲡⲁⲓ̈ ⲉⲧⲁϩϫⲓ ⲟⲩⲛⲟϭ <text:line-break/><text:span text:style-name="T1"> </text:span><text:span text:style-name="T2">(10/21) </text:span> ⲛ̅ⲇⲩⲛⲁⲙⲓⲥ ⲉ[ⲃ]ⲟⲗ ϩⲓ̣ⲧ̣ⲛ ⲧⲉϥⲙⲁⲁⲩ ⲁⲩⲱ ⲁϥ‐ <text:line-break/><text:span text:style-name="T1"> </text:span><text:span text:style-name="T2">(10/22) </text:span> ⲥⲉϩⲱⲱϥ ⲉⲃⲟⲗ ⲙ̅ⲙⲟⲥ ⲁⲩⲱ ⲁϥ ⲡⲱⲱⲛⲉ ⲉ‐ <text:line-break/><text:span text:style-name="T1"> </text:span><text:span text:style-name="T2">(10/23) </text:span> ⲃⲟⲗ ϩⲛ̅ ⲛ̅ⲧⲟⲡⲟⲥ ⲉⲧⲁⲩϫⲡⲟϥ ⲛ̅ϩⲏⲧⲟⲩ· ⲁϥ‐ <text:line-break/><text:span text:style-name="T1"> </text:span><text:span text:style-name="T2">(10/24) </text:span> ⲉⲙⲁϩⲧⲉ ⲁϥⲧⲁⲙⲓⲟ ⲛⲁϥ ⲛ̅ϩⲛ̅ⲕⲉⲁⲓⲱⲛ ϩⲛ̅ <text:line-break/><text:span text:style-name="T1"> </text:span><text:span text:style-name="T2">(10/25) </text:span> ⲟⲩϣⲁϩ ⲛ̅ⲕⲱϩⲧ ⲛ̅ⲟⲩⲟⲉⲓⲛ ⲡⲁⲓ̈ ⲉⲧϣⲟⲟⲡ <text:line-break/><text:span text:style-name="T1"> </text:span><text:span text:style-name="T2">(10/26) </text:span> ⲧⲉⲛⲟⲩ ⲁⲩⲱ ⲁϥⲧⲱⲙⲧ ϩⲛ̅ ⲧⲉϥⲁⲡⲟⲛⲟⲓⲁ <text:line-break/><text:span text:style-name="T1"> </text:span><text:span text:style-name="T2">(10/27) </text:span> ⲧⲁⲓ̈ ⲉⲧϣⲟⲟⲡ· ϩⲣⲁⲓ̈ ⲛ̅ϩⲏⲧϥ ⲁⲩⲱ ⲁϥϫⲡⲟ ⲛ̅‐ <text:line-break/><text:span text:style-name="T1"> </text:span><text:span text:style-name="T2">(10/28) </text:span> ϩⲉⲛⲉⲝⲟⲩⲥⲓⲁ ⲛⲁϥ ⲡϣⲟⲣⲡ ⲙⲉⲛ ⲡⲉϥⲣⲁⲛ <text:line-break/><text:span text:style-name="T1"> </text:span><text:span text:style-name="T2">(10/29) </text:span> ⲡⲉ ⲁ̅ⲑ̅ⲱ̅ⲑ̅ ⲡⲁ̣ⲓ̈ ⲉⲧⲟⲩⲙⲟⲩⲧⲉ ⲉⲣⲟϥ ⲛ̅ϭⲓ ⲛ̅ⲅⲉ‐ <text:line-break/><text:span text:style-name="T1"> </text:span><text:span text:style-name="T2">(10/30) </text:span> ⲛⲉⲁ ϫⲉ ⲡ̣[ϫⲁⲓ̈ⲟ]ϩ̣ⲥ̅ ⲡⲙⲉϩⲥⲛⲁⲩ ⲡⲉ ϩ̅ⲁ̅ⲣ̅ⲙ̅ⲁ̅ⲥ̅ <text:line-break/><text:span text:style-name="T1"> </text:span><text:span text:style-name="T2">(10/31) </text:span> ⲉⲧⲉ ⲡⲁⲓ̣ [ⲡⲉ ⲡⲃⲁⲗ] ⲙ̅ⲡⲕⲱϩ· ⲡⲙⲉϩϣⲟⲙⲧ <text:line-break/><text:span text:style-name="T1"> </text:span><text:span text:style-name="T2">(10/32) </text:span> ⲡⲉ ⲕ̅ⲁ̅ⲗ̅ⲓ̅ⲗ̅ⲁ̅ ⲟ̣̅ⲩ̣ⲙⲃⲣⲓ̅ ⲡⲙⲉϩϥⲧⲟⲟⲩ ⲡⲉ ⲓ̅̈ⲁⲃⲏⲗ̅ <text:line-break/><text:span text:style-name="T1"> </text:span><text:span text:style-name="T2">(10/33) </text:span> ⲡⲙⲉϩϯⲟⲩ ⲡⲉ ⲁ̅ⲇ̅ⲱ̅ⲛ̅ⲁ̅ⲓ̅̈̅ⲟ̅ⲩ̅ ⲡⲉⲧⲟⲩⲙⲟⲩⲧⲉ <text:line-break/><text:span text:style-name="T1"> </text:span><text:span text:style-name="T2">(10/34) </text:span> ⲉⲣⲟϥ ϫⲉ ⲥ̅ⲁ̅ⲃ̅ⲁ̅ⲱ̅ⲑ̅· ⲡⲙⲉϩⲥⲟⲟⲩ ⲡⲉ ⲕ̅ⲁⲓ̈ⲛ̅ <text:line-break/><text:span text:style-name="T1"> </text:span><text:span text:style-name="T2">(10/35) </text:span> ⲡⲁⲓ̈ ⲉⲧⲟⲩⲙⲟⲩⲧⲉ ⲉⲣⲟϥ ⲛ̅ϭⲓ ⲛ̅ⲅⲉⲛⲉⲁ ⲛ̅ⲣⲣⲱ‐ <text:line-break/><text:span text:style-name="T1"> </text:span><text:span text:style-name="T2">(10/36) </text:span> ⲙⲉ ϫⲉ ⲡⲣⲏ ⲡⲙⲉϩⲥⲁϣϥ ⲡⲉ ⲁ̅ⲃ̅ⲉ̅ⲗ̅ ⲡⲙⲉϩ <text:line-break/><text:span text:style-name="T1"> </text:span><text:span text:style-name="T2">(10/37) </text:span> ϣⲙⲟⲩⲛ ⲡ̣ⲉ ⲁ̅ⲃ̅ⲣ̅ⲓ̅ⲥ̅ⲉ̅ⲛ̅ⲉ̅· ⲡⲙⲉϩⲯⲓⲥ ⲡⲉ ⲓ̅̈ⲱⲃⲏⲗ̅ <text:line-break/><text:span text:style-name="T1"> </text:span><text:span text:style-name="T2">(11/1) </text:span> ⲡⲙⲉϩⲙⲏⲧ’ ⲡⲉ ⲁ̅ⲣ̅ⲙ̅ⲟ̅ⲩ̅ⲡ̅ⲓ̅ⲉ̅ⲏ̅ⲗ̅· ⲡⲙⲉϩⲙⲛ̅‐ <text:line-break/><text:span text:style-name="T1"> </text:span><text:span text:style-name="T2">(11/2) </text:span> ⲧⲟⲩⲉ· ⲡⲉ ⲙ̅ⲉ̅ⲗ̅ⲭ̅ⲉ̅ⲓ̅ⲣ̅ⲁ̅ⲇ̅ⲱ̅ⲛ̅ⲉ̅ⲓ̅ⲛ̅· ⲡⲙⲉϩⲙⲛ̅ <text:line-break/><text:span text:style-name="T1"> </text:span><text:span text:style-name="T2">(11/3) </text:span> ⲧⲥⲛⲟⲟⲩⲥ ⲡⲉ ⲃⲉⲗⲓⲁⲥ ⲡⲁⲓ̈ ⲡⲉ ⲉⲧϩⲓϫⲛ̅ ⲡϣⲓⲕ‐ <text:line-break/><text:span text:style-name="T1"> </text:span><text:span text:style-name="T2">(11/4) </text:span> ⲛ̅ⲁⲙ̅ⲛ̅ⲧ̅ⲉ ⲁⲩⲱ ⲁϥⲧⲉϩⲟ ⲉⲣⲁⲧϥ̅ ⲛ̅ⲥⲁϣϥ ⲛ̅ⲣ̅ⲣⲟ <text:line-break/><text:span text:style-name="T1"> </text:span><text:span text:style-name="T2">(11/5) </text:span> ⲟⲩⲁ ⲕⲁⲧⲁ ⲥⲧⲉⲣⲉⲱⲙⲁ ⲛ̅ⲧⲡⲉ ⲉϩⲣⲁⲓ̈ ⲉϫⲛ̅ ⲧⲙⲉϩ‐ <text:line-break/><text:span text:style-name="T1"> </text:span><text:span text:style-name="T2">(11/6) </text:span> ⲥⲁϣϥⲉ ⲙ̅ⲡⲉ ⲁⲩⲱ ϯⲟⲩ ⲁϫⲙ̅ ⲡϣⲓⲕ ⲙ̅ⲡⲛⲟⲩⲛ <text:line-break/><text:span text:style-name="T1"> </text:span><text:span text:style-name="T2">(11/7) </text:span> ϩⲱⲥⲧⲉ ⲁⲧⲣⲟⲩⲣ̅ⲣ̅ⲣⲟ ⲁⲩⲱ ⲁϥⲡⲱϣ ⲉϫⲱⲟⲩ ⲉⲃⲟⲗ <text:line-break/><text:span text:style-name="T1"> </text:span><text:span text:style-name="T2">(11/8) </text:span> ϩⲙ̅ ⲡⲉϥⲕⲱϩⲧ’ ⲙ̅ⲡⲉϥⲧⲛ̅ⲛⲉⲩ ⲇⲉ ⲉⲃⲟⲗ ϩⲛ̅ <text:line-break/><text:span text:style-name="T1"> </text:span><text:span text:style-name="T2">(11/9) </text:span> ⲧϭⲁⲙ ⲙ̅ⲡⲟⲩⲟⲉⲓⲛ ⲉⲛⲧⲁϥϫⲓⲧⲥ̅ ⲛⲧⲛ̅ ⲧⲉϥⲙⲁ‐ <text:line-break/><text:span text:style-name="T1"> </text:span><text:span text:style-name="T2">(11/10) </text:span> ⲁⲩ ⲛ̅ⲧⲟϥ ⲅⲁⲣ ⲟⲩⲕⲁⲕⲉ ⲛ̅ⲁⲧⲥⲟⲟⲩⲛⲉ ⲡⲉ ⲡⲟⲩ‐ <text:line-break/><text:span text:style-name="T1"> </text:span><text:span text:style-name="T2">(11/11) </text:span> ⲟⲉⲓⲛ ⲇⲉ ⲛ̅ⲧⲁⲣⲉϥⲧⲱϩ ⲙⲛ̅ ⲡⲕⲁⲕⲉ ⲁϥⲧⲣⲉⲡⲕⲁ‐ <text:line-break/><text:span text:style-name="T1"> </text:span><text:span text:style-name="T2">(11/12) </text:span> ⲕⲉ ⲣ̅ ⲟⲩⲟⲉⲓⲛ ⲡⲕⲁⲕⲉ ⲇⲉ ⲛ̅ⲧⲁⲣⲉϥⲧⲱϩ ⲙⲛ̅ <text:line-break/><text:span text:style-name="T1"> </text:span><text:span text:style-name="T2">(11/13) </text:span> ⲡⲟⲩⲟⲉⲓⲛ ⲁϥϩⲧⲙ̅ⲧⲙ̅ ⲡⲟⲩⲟⲉⲓⲛ ⲁⲩⲱ ⲙ̅ⲡϥϣⲱ‐ <text:line-break/><text:span text:style-name="T1"> </text:span><text:span text:style-name="T2">(11/14) </text:span> ⲡⲉ ⲛ̅ⲟⲩⲟⲉⲓⲛ ⲟⲩⲧⲉ ⲛ̅ⲕⲁⲕⲉ ⲁⲗⲗⲁ ⲁϥϣⲱⲡ̣ⲉ ⲉϥ‐ <text:line-break/><text:span text:style-name="T1"> </text:span><text:span text:style-name="T2">(11/15) </text:span> ϣⲟⲛⲉ ⲡⲓⲁⲣⲭⲱⲛ ϭⲉ ⲉⲧϣⲟⲛⲉ ⲟⲩⲛ̅ⲧⲁϥ ⲙ̅ⲙⲁⲩ <text:line-break/><text:span text:style-name="T1"> </text:span><text:span text:style-name="T2">(11/16) </text:span> ⲛ̅ϣⲟⲙⲧ ⲛ̅ⲣⲁⲛ ⲡϣⲟⲣⲡ ⲛ̅ⲣⲁⲛ ⲡⲉ ⲓ̅̈̅ⲁ̅ⲗ̅ⲧ̅ⲁ̅ⲃ̅ⲁ̣̅̅[̅ⲱ̅ⲑ̅]̅ <text:line-break/><text:span text:style-name="T1"> </text:span><text:span text:style-name="T2">(11/17) </text:span> ⲡⲙⲉϩⲥⲛⲁⲩ ⲡⲉ ⲥ̅ⲁ̅ⲕ̅ⲗ̅ⲁ̅ⲥ̅ ⲡⲙⲉϩϣⲟⲙⲧ ⲡⲉ̣ <text:line-break/><text:span text:style-name="T1"> </text:span><text:span text:style-name="T2">(11/18) </text:span> ⲥⲁ̅ⲙ̅ⲁ̅ⲏ̅ⲗ ⲡⲁⲓ̈ ⲇⲉ ⲟⲩϣⲁϥⲧⲉ ⲡⲉ ϩⲛ̅ ⲧⲉϥⲁⲡⲟ̣[ⲛⲟ]ⲓⲁ <text:line-break/><text:span text:style-name="T1"> </text:span><text:span text:style-name="T2">(11/19) </text:span> ⲧⲁⲓ̈ ⲉⲧϣⲟⲟⲡ ⲛ̅ϩⲣⲁⲓ̈ ⲛ̅ϩⲏⲧϥ̅ ⲁϥϫⲟⲟⲥ ⲅⲁⲣ ϫⲉ <text:line-break/><text:span text:style-name="T1"> </text:span><text:span text:style-name="T2">(11/20) </text:span> ⲁⲛⲟⲕ ⲡⲉ ⲡⲛⲟⲩⲧⲉ ⲁⲩⲱ ⲙⲛ̅ ⲕⲉⲛⲟⲩⲧⲉ ϣⲟⲟⲡ <text:line-break/><text:span text:style-name="T1"> </text:span><text:span text:style-name="T2">(11/21) </text:span> ⲛ̅ⲥⲁⲃⲗ̅ⲗⲏⲉⲓ· ⲉϥⲟ ⲛ̅ⲁⲧⲥⲟⲟⲩⲛ ⲙ̅ⲡⲉϥⲧⲁϫⲣⲟ <text:line-break/><text:soft-page-break/><text:span text:style-name="T1"> </text:span><text:span text:style-name="T2">(11/22) </text:span> ⲡⲙⲁ ⲉⲛⲧⲁϥⲉⲓ ⲉⲃⲟⲗ ⲙ̅ⲙⲁⲩ ⲁⲩⲱ ⲁⲩⲧⲁⲙⲓⲟ <text:line-break/><text:span text:style-name="T1"> </text:span><text:span text:style-name="T2">(11/23) </text:span> ⲛ̅ϭⲓ ⲛⲁⲣⲭⲱⲛ ⲛ̅ⲥⲁϣϥⲉ ⲛ̅ϭⲟⲙ ⲛⲁⲩ· ⲁⲩⲱ <text:line-break/><text:span text:style-name="T1"> </text:span><text:span text:style-name="T2">(11/24) </text:span> ⲛ̅ϭⲟⲙ ⲁⲩⲧⲁⲙⲓⲟ ⲛⲁⲩ ⲛ̅ⲥⲟⲟⲩ ⲛ̅ⲁⲅⲅⲉⲗⲟⲥ ⲁ‐ <text:line-break/><text:span text:style-name="T1"> </text:span><text:span text:style-name="T2">(11/25) </text:span> ⲡⲟⲩⲁ ϣⲁⲛⲧⲟⲩⲣ̅ ϣⲙ̅ⲧ̅ϣⲉⲥⲉⲧⲏ ⲛ̅ⲁⲅⲅⲉⲗⲟⲥ <text:line-break/><text:span text:style-name="T1"> </text:span><text:span text:style-name="T2">(11/26) </text:span> ϯ ⲇⲉ ⲛⲉ ⲛⲥⲱⲙⲁ ⲛ̅ⲛ̅ⲣⲓⲛ ⲡϣⲟⲣⲡ 〈ⲡ〉ⲉ ⲁ̅ⲑ̅ⲱ̅ⲑ̅ <text:line-break/><text:span text:style-name="T1"> </text:span><text:span text:style-name="T2">(11/27) </text:span> ⲟⲩϩⲟ ⲛ̅ⲛⲉⲥⲟⲟⲩ ⲡⲉ ⲡⲙⲉϩⲥⲛⲁⲩ ⲡⲉ ⲉ̅ⲗ̅ⲱ̅‐ <text:line-break/><text:span text:style-name="T1"> </text:span><text:span text:style-name="T2">(11/28) </text:span> ⲁ̅ⲓ̅ⲟ̅ⲩ̅ ⲟⲩϩⲟ ⲛ̅ⲧⲩⲫⲱⲛ ⲡⲉ ⲡⲙⲉϩϣⲟⲙⲧ <text:line-break/><text:span text:style-name="T1"> </text:span><text:span text:style-name="T2">(11/29) </text:span> ⲡⲉ ⲁⲥⲧ̅ⲁ̅ⲫ̅ⲁ̅ⲓ̅ⲟ̅ⲥ̅ ⲟⲩϩ[ⲟ ⲛ̅ϩⲟⲉⲓ]ⲧⲉ ⲡⲉ ⲡⲙⲉϩ‐ <text:line-break/><text:span text:style-name="T1"> </text:span><text:span text:style-name="T2">(11/30) </text:span> ϥⲧⲟⲟⲩ ⲡⲉ ⲓ̅̈̅ⲁ̅ⲱ̅ ⲟⲩϩ[ⲟ ⲛ̅ⲇⲣⲁⲕ]ⲱ̣ⲛ ⲡⲉ ⲉⲩⲛ̅‐ <text:line-break/><text:span text:style-name="T1"> </text:span><text:span text:style-name="T2">(11/31) </text:span> ⲧⲉϥ’ ⲥⲁϣϥⲉ ⲛ̅ⲁⲡⲉ· ⲡⲙⲉ̣ϩϯⲟⲩ ⲡⲉ ⲥ̅ⲁ̅ⲃ̅ⲁ̅ⲱ̅ⲑ̅ <text:line-break/><text:span text:style-name="T1"> </text:span><text:span text:style-name="T2">(11/32) </text:span> ⲟⲩϩⲟ ⲛ̅ⲇⲣⲁⲕⲱⲛ ⲡⲙⲉϩⲥⲟⲟⲩ ⲡⲉ ⲁⲇⲱⲛⲓⲛ <text:line-break/><text:span text:style-name="T1"> </text:span><text:span text:style-name="T2">(11/33) </text:span> ⲟⲩϩⲟ ⲛ̅ⲏⲛⲉ ⲡⲉ ⲡⲙⲉϩⲥⲁϣϥ ⲡⲉ ⲥ̅ⲁ̅ⲃ̅ⲃ̅ⲉ̅ⲇ̅ⲉ̅ <text:line-break/><text:span text:style-name="T1"> </text:span><text:span text:style-name="T2">(11/34) </text:span> ⲟⲩϩⲟ ⲛ̅ⲕⲱϩⲧ ⲡⲉ ⲉϥϯ ⲟⲩⲟⲉⲓⲛ ⲧⲁⲓ̈ ⲧⲉ ⲧϩⲉ‐ <text:line-break/><text:span text:style-name="T1"> </text:span><text:span text:style-name="T2">(11/35) </text:span> ⲃⲇⲟⲙⲁⲥ ⲛ̅ⲧⲉ ⲡⲥⲁⲃⲃⲁⲧⲟⲛ ⲓ̈ⲁⲗⲧⲁⲃⲁⲱⲑ <text:line-break/><text:span text:style-name="T1"> </text:span><text:span text:style-name="T2">(11/36) </text:span> ⲇⲉ ⲛⲉ ⲟⲩⲛ̅ⲧⲁϥ ⲙ̅ⲙⲁⲩ ⲛ̅ⲟⲩⲙⲏⲏϣ[ⲉ] <text:line-break/><text:span text:style-name="T1"> </text:span><text:span text:style-name="T2">(12/1) </text:span> ⲙ̅ⲡⲣⲟⲥⲱⲡⲟⲛ ⲉϥⲟⲩⲏϩ ϩⲓϫⲱⲟⲩ ⲧⲏ‐ <text:line-break/><text:span text:style-name="T1"> </text:span><text:span text:style-name="T2">(12/2) </text:span> ⲣⲟⲩ ϩⲱⲥⲧⲉ ⲁⲧⲣⲉϥⲉⲓⲛⲉ ⲛ̅ⲟⲩϩⲟ ⲛⲁϩ‐ <text:line-break/><text:span text:style-name="T1"> </text:span><text:span text:style-name="T2">(12/3) </text:span> ⲣⲉⲟⲩ ⲧⲏⲣⲟⲩ ⲕⲁⲧⲁ ⲡⲉϥⲟⲩⲱϣⲉ ⲉϥϣⲟ‐ <text:line-break/><text:span text:style-name="T1"> </text:span><text:span text:style-name="T2">(12/4) </text:span> ⲟⲡ ϩⲛ̅ ⲧⲙⲏⲧⲉ ⲛ̅ϩⲉⲛⲥⲁⲣⲁⲫⲓⲛ ⲁϥⲡⲱ‐ <text:line-break/><text:span text:style-name="T1"> </text:span><text:span text:style-name="T2">(12/5) </text:span> ϣⲉ ⲁϫⲱⲟⲩ ⲉⲃⲟⲗ ϩⲙ̅ ⲡⲉϥⲕⲱϩⲧ ⲉⲧⲃⲉ <text:line-break/><text:span text:style-name="T1"> </text:span><text:span text:style-name="T2">(12/6) </text:span> ⲡⲁⲓ̈ ⲁϥⲣ̅ ϫⲟⲉⲓⲥ ⲉⲣⲟⲟⲩ ⲉⲧⲃⲉ ⲧϭⲟⲙ ⲙ̅‐ <text:line-break/><text:span text:style-name="T1"> </text:span><text:span text:style-name="T2">(12/7) </text:span> ⲡⲉⲟⲟⲩ ⲉⲧϣⲟⲟⲡ ⲛⲁϥ’ ⲛ̅ⲟⲩⲟⲉⲓⲛ ⲛ̅ⲧⲉ <text:line-break/><text:span text:style-name="T1"> </text:span><text:span text:style-name="T2">(12/8) </text:span> ⲧⲉϥⲙⲁⲁⲩ ⲉⲧⲃⲉ ⲡⲁⲓ̈ ⲁϥⲙⲟⲩⲧⲉ ⲉⲣⲟϥ ⲙ̅‐ <text:line-break/><text:span text:style-name="T1"> </text:span><text:span text:style-name="T2">(12/9) </text:span> ⲙⲓⲛ ⲙ̅ⲙⲟϥ ϫⲉ ⲛⲟⲩⲧⲉ ⲛⲁϥⲣ̅ⲡⲓⲑⲉ ⲇⲉ <text:line-break/><text:span text:style-name="T1"> </text:span><text:span text:style-name="T2">(12/10) </text:span> ⲁⲛ ⲁⲡⲙⲁ ⲉⲛⲧⲁϥⲉⲓ ⲉⲃⲟⲗ ⲛ̅ϩⲏⲧϥ ⲁⲩⲱ <text:line-break/><text:span text:style-name="T1"> </text:span><text:span text:style-name="T2">(12/11) </text:span> ⲁϥⲙⲟⲩϣϭ ⲙⲛ̅ ⲛ̅ⲉⲝⲟⲩⲥⲓⲁ ⲉⲧϣⲟⲟⲡ <text:line-break/><text:span text:style-name="T1"> </text:span><text:span text:style-name="T2">(12/12) </text:span> ϩⲁⲣⲟϥ ⲛ̅ⲥⲁϣϥⲉ ⲛ̅ϭⲟⲙ ϩⲣⲁⲓ̈ ϩⲙ̅ ⲡⲉϥⲙⲉ‐ <text:line-break/><text:span text:style-name="T1"> </text:span><text:span text:style-name="T2">(12/13) </text:span> ⲉⲩⲉ ⲁⲩⲱ ϩⲙ̅ ⲡⲧⲣⲉϥϫⲟⲟⲥ ⲁϥϣⲱⲡⲉ ⲁⲩ‐ <text:line-break/><text:span text:style-name="T1"> </text:span><text:span text:style-name="T2">(12/14) </text:span> ⲱ ⲁϥϯ ⲣⲁⲛ ⲉⲧϭⲟⲙ ⲧϭⲟⲙ ⲁϥⲣ̅ⲁⲣⲭⲉⲥ‐ <text:line-break/><text:span text:style-name="T1"> </text:span><text:span text:style-name="T2">(12/15) </text:span> ⲑⲁⲓ ϫⲛ̅ ⲙ̅ⲡⲥⲁⲛⲧⲡⲉ ⲡϣⲟⲣⲡ ⲙⲉⲛ ⲧⲉ <text:line-break/><text:span text:style-name="T1"> </text:span><text:span text:style-name="T2">(12/16) </text:span> ⲧⲙⲛⲧⲭⲣ̅ⲥ̅ ϩⲁϩⲧⲛ̅ ⲡϣⲟⲣⲡ ⲁ̅ⲑⲱⲑ̅· <text:line-break/><text:span text:style-name="T1"> </text:span><text:span text:style-name="T2">(12/17) </text:span> ⲡⲙⲉϩⲥⲛⲁⲩ ⲧⲉ ⲧⲡⲣⲟⲛⲟⲓⲁ ϩⲁⲧⲛ̅ <text:line-break/><text:span text:style-name="T1"> </text:span><text:span text:style-name="T2">(12/18) </text:span> ⲡⲙⲉϩⲥⲛⲁⲩ ⲉ̅ⲗ̅ⲱ̅ⲁ̅ⲓ̅ⲱ̅· ⲧⲙⲉϩϣⲟⲙⲧ’ <text:line-break/><text:span text:style-name="T1"> </text:span><text:span text:style-name="T2">(12/19) </text:span> ⲇⲉ ⲡⲉ ⲁ̅ⲥ̅ⲧ̅ⲣ̅ⲁ̅ⲫ̅ⲁ̅ⲓ̅ⲱ̅· ⲧⲙⲉϩϥⲧⲟⲉ ⲧⲉ ⲧ‐ <text:line-break/><text:span text:style-name="T1"> </text:span><text:span text:style-name="T2">(12/20) </text:span> ⲙ̅ⲛ̅ⲧ̅ϫⲟⲉⲓⲥ ϩⲁⲧⲛ̅ ⲡⲙⲉϩϥⲧⲟⲟⲩ ⲓ̅ⲁⲱ̅ <text:line-break/><text:span text:style-name="T1"> </text:span><text:span text:style-name="T2">(12/21) </text:span> ⲧⲙⲉϩϯⲉ ⲧⲉ ⲧⲙⲛⲧⲉⲣⲟ ϩⲁϩⲧⲛ̅ ⲡⲙⲉϩϯ‐ <text:line-break/><text:span text:style-name="T1"> </text:span><text:span text:style-name="T2">(12/22) </text:span> ⲟⲩ· ⲥⲁ̅ⲛ̅ⲃ̅ⲁ̅ⲱ̅ⲑ̅· ⲧⲙⲉϩⲥⲟ ⲡⲉ ⲡⲕⲱϩ ϩⲁ‐ <text:line-break/><text:span text:style-name="T1"> </text:span><text:span text:style-name="T2">(12/23) </text:span> ϩⲧⲛ̅ ⲡⲙⲉϩⲥⲟⲟⲩ ⲁⲇ̅ⲱ̅ⲛ̅ⲉ̅ⲓ̅ⲛ̅ ⲧⲙⲉϩⲥⲁϣϥ <text:line-break/><text:span text:style-name="T1"> </text:span><text:span text:style-name="T2">(12/24) </text:span> ⲧⲉ ⲧⲙ̅ⲛ̅ⲧ̅ⲣⲙⲛ̅ϩⲏⲧ ϩⲁⲧⲛ̅ ⲡⲙⲉϩⲥⲁϣ̅ϥ̅ <text:line-break/><text:span text:style-name="T1"> </text:span><text:span text:style-name="T2">(12/25) </text:span> ⲥⲁⲃⲃⲁⲧⲉⲱⲛ ⲛⲁⲓ̈ ⲇⲉ ⲟⲩⲛ̅ⲧⲁⲩ ⲙ̅ⲙⲁⲩ ⲛ̅‐ <text:line-break/><text:span text:style-name="T1"> </text:span><text:span text:style-name="T2">(12/26) </text:span> ⲟⲩⲥⲧⲉⲣⲉⲱⲙⲁ ⲕⲁⲧⲁ ⲡⲉ ⲛ̅ⲁⲓⲱⲛ ⲛⲁⲓ̈ ⲙⲉⲛ <text:line-break/><text:span text:style-name="T1"> </text:span><text:span text:style-name="T2">(12/27) </text:span> ⲁⲩϯ ⲣⲁⲛ ⲉⲣⲟⲟ̣ⲩ ⲕⲁⲧⲁ ⲡⲉⲟⲟⲩ ⲛ̅ⲛⲁⲧⲡⲉ <text:line-break/><text:span text:style-name="T1"> </text:span><text:span text:style-name="T2">(12/28) </text:span> ⲉⲡϣⲟⲣ̣[ϣⲣ̅ ⲛ̅ⲛⲓ]ϭⲟⲙ ⲛ̅ⲣⲁⲛ ⲇⲉ ⲉⲛⲧⲁⲩ‐ <text:line-break/><text:span text:style-name="T1"> </text:span><text:span text:style-name="T2">(12/29) </text:span> ⲧⲁⲁⲩ ⲉⲣⲟ̣[ⲟⲩ ϩⲓⲧⲛ̅] ⲡⲟⲩⲁⲣⲭⲓⲅⲉⲛⲛⲏⲧⲱⲣ <text:line-break/><text:span text:style-name="T1"> </text:span><text:span text:style-name="T2">(12/30) </text:span> ⲉⲩⲣ̅ ϭⲟⲙ’ ϩⲣⲁⲓ ⲛ̅ϩⲏⲧⲟⲩ ⲛ̅ⲣⲁⲛ ⲇⲉ ⲉⲧⲧⲟ <text:line-break/><text:span text:style-name="T1"> </text:span><text:span text:style-name="T2">(12/31) </text:span> ⲉⲣⲟⲟⲩ ⲕⲁⲧⲁ ⲡⲉⲟⲟⲩ ⲛ̅ⲛⲁⲧⲡⲉ ⲉⲩ ϣⲟⲟⲡ <text:line-break/><text:span text:style-name="T1"> </text:span><text:span text:style-name="T2">(12/32) </text:span> ⲛⲁⲩ ⲉⲩϣⲟⲣϣⲣ̅· ⲁⲩⲱ ⲁⲩⲙ̅ⲛ̅ⲧ̅ⲁⲧϭⲟⲙ ⲛⲁⲩ <text:line-break/><text:soft-page-break/><text:span text:style-name="T1"> </text:span><text:span text:style-name="T2">(12/33) </text:span> ϩⲱⲥⲧⲉ ⲉⲩⲛ̅ⲧⲁⲩ ⲙ̅ⲙⲁⲩ ⲛ̅ⲣⲁⲛ ⲥⲛⲁⲩ ⲛ̅ⲕⲁ <text:line-break/><text:span text:style-name="T1"> </text:span><text:span text:style-name="T2">(12/34) </text:span> ⲇⲉ ⲛⲓⲙ ⲁϥⲧⲥⲉⲛⲟϥ ⲕⲁⲧⲁ ⲡⲓⲛⲉ ⲛ̅ⲛ̅ϣⲟⲣⲡ <text:line-break/><text:span text:style-name="T1"> </text:span><text:span text:style-name="T2">(12/35) </text:span> [ⲛ̅]ⲁⲓⲱⲛ ⲉⲛⲧⲁϩϣⲱⲡⲉ ϩⲱⲥⲧⲉ ⲁⲧⲣⲉϥ‐ <text:line-break/><text:span text:style-name="T1"> </text:span><text:span text:style-name="T2">(13/1) </text:span> ⲧⲁⲙⲓⲟⲟⲩ ⲙ̅ⲡⲥⲙⲁⲧ ⲛ̅ⲁⲧⲧⲉⲕⲟ ⲟⲩⲭ ϩⲟⲧⲓ <text:line-break/><text:span text:style-name="T1"> </text:span><text:span text:style-name="T2">(13/2) </text:span> ⲛ̅ⲧⲁϥ ϫⲉ ⲁϥⲛⲁⲩ ⲁⲛⲁⲧⲧⲉⲕⲟ ⲁⲗⲗⲁ ⲧϭⲟⲙ <text:line-break/><text:span text:style-name="T1"> </text:span><text:span text:style-name="T2">(13/3) </text:span> ⲉⲧⲛ̅ϩⲏⲧϥ ⲧⲁⲓ̈ ⲉⲛⲧⲁϥϫⲓⲧⲥ̅ ⲉⲃⲟⲗ ϩⲓⲧⲛ̅ <text:line-break/><text:span text:style-name="T1"> </text:span><text:span text:style-name="T2">(13/4) </text:span> ⲧⲉϥⲙⲁⲁⲩ ⲉⲁⲥϫⲡⲟ ⲛ̅ϩⲏⲧϥ ⲙ̅ⲡⲓⲛⲉ· ⲙ̅‐ <text:line-break/><text:span text:style-name="T1"> </text:span><text:span text:style-name="T2">(13/5) </text:span> ⲡⲧⲥⲉⲛⲟ ⲉϥⲛⲁⲩ ⲇⲉ ⲁⲧⲕⲧⲓⲥⲓⲥ ⲉⲧⲕⲱⲧⲉ <text:line-break/><text:span text:style-name="T1"> </text:span><text:span text:style-name="T2">(13/6) </text:span> ⲉⲣⲟϥ ⲁⲩⲱ ⲡⲁϣⲁⲓ̈ ⲛ̅ⲛ̅ⲁⲅⲅⲉⲗⲟⲥ ⲉⲧⲕⲧⲏⲩ <text:line-break/><text:span text:style-name="T1"> </text:span><text:span text:style-name="T2">(13/7) </text:span> ⲉⲣⲟϥ’ ⲛⲁⲓ̈ ⲉⲛⲧⲁⲩϣⲱⲡⲉ ⲉⲃⲟⲗ ⲙ̅ⲙⲟϥ ⲡⲉ‐ <text:line-break/><text:span text:style-name="T1"> </text:span><text:span text:style-name="T2">(13/8) </text:span> ϫⲁϥ ⲛⲁⲩ· ϫⲉ ⲁⲛⲟⲕ ⲁⲛⲕ ⲟⲩⲛⲟⲩⲧⲉ ⲛ̅ⲣⲉϥ‐ <text:line-break/><text:span text:style-name="T1"> </text:span><text:span text:style-name="T2">(13/9) </text:span> ⲕⲱϩ ⲁⲩⲱ ⲙⲛ̅ ⲕⲉⲛⲟⲩⲧⲉ ⲛ̅ⲥⲁⲃⲗ̅ⲗⲁⲓ̈ ⲡⲁⲓ̈ ⲇⲉ <text:line-break/><text:span text:style-name="T1"> </text:span><text:span text:style-name="T2">(13/10) </text:span> ⲉϥⲧⲁⲩⲟ ⲙ̅ⲙⲟϥ· ⲉϥⲣ̅ⲥⲏⲙⲁⲛⲉ ⲛ̅ⲛ̅ⲁⲅⲅⲉ‐ <text:line-break/><text:span text:style-name="T1"> </text:span><text:span text:style-name="T2">(13/11) </text:span> ⲗⲟⲥ ⲉⲧϣⲟⲟⲡ’ ϣⲁⲣⲟϥ ϫⲉ ⲟⲩⲛ ⲕⲉ ⲛⲟⲩⲧⲉ <text:line-break/><text:span text:style-name="T1"> </text:span><text:span text:style-name="T2">(13/12) </text:span> ϣⲟⲟⲡ ⲉⲛⲉ ⲙ̅ⲛ̅ ⲕⲉⲟⲩⲁ ⲅⲁⲣ ϣⲟⲟⲡ’ ⲛⲉ ⲛⲓⲙ <text:line-break/><text:span text:style-name="T1"> </text:span><text:span text:style-name="T2">(13/13) </text:span> ⲡⲉⲧϥⲛⲁⲕⲱϩ ⲉⲣⲟϥ ⲁⲥⲣ̅ⲁⲣⲭⲉⲥⲑⲉ ϭⲉ ⲛ̅ϣⲉ <text:line-break/><text:span text:style-name="T1"> </text:span><text:span text:style-name="T2">(13/14) </text:span> ⲉⲓ ⲛ̅ϭⲓ ⲧⲙⲁⲁⲩ ⲁⲥⲙ̅ⲙⲉ ⲁⲡϣⲧⲁ ϩⲙ̅ ⲡⲧⲣⲉϥ‐ <text:line-break/><text:span text:style-name="T1"> </text:span><text:span text:style-name="T2">(13/15) </text:span> ϭⲱϫⲃ ⲛ̅ϭⲓ ⲡⲣⲣⲓⲉ ⲙ̅ⲡⲉⲥⲟⲩⲟⲉⲓⲛ ⲁⲩⲱ ⲁⲥ‐ <text:line-break/><text:span text:style-name="T1"> </text:span><text:span text:style-name="T2">(13/16) </text:span> ϩⲧⲟⲙϩⲧⲙ̅ ⲉⲃⲟⲗ ϫⲉ ⲙ̅ⲡⲉϥⲣ̅ⲥⲩⲙⲫⲱⲛⲉ <text:line-break/><text:span text:style-name="T1"> </text:span><text:span text:style-name="T2">(13/17) </text:span> ⲛⲙ̅ⲙⲁⲥ ⲛ̅ϭⲓ ⲡⲉⲥϣⲃⲣ̅ϩⲱⲧ̅ⲣ̅ ⲁⲛⲟⲕ ⲇⲉ ⲡⲉ‐ <text:line-break/><text:span text:style-name="T1"> </text:span><text:span text:style-name="T2">(13/18) </text:span> ϫⲁⲉⲓ ϫⲉ ⲡϫⲟⲉⲓⲥ ⲟⲩ ⲡⲉ ⲁⲥϣⲉⲉⲓ· ⲛ̅ⲧⲟϥ ⲇⲉ <text:line-break/><text:span text:style-name="T1"> </text:span><text:span text:style-name="T2">(13/19) </text:span> ⲁϥⲥⲱⲃⲉ ⲡⲉϫⲁϥ ϫⲉ ⲙ̅ⲡⲣ̅ⲙⲉⲉⲩⲉ ϫⲉ ⲕⲁ‐ <text:line-break/><text:span text:style-name="T1"> </text:span><text:span text:style-name="T2">(13/20) </text:span> ⲧⲁ ⲑⲉ ⲉⲛⲧⲁϥϫⲟⲟⲥ ⲛ̅ϭⲓ ⲙⲱⲩ̈ⲥⲏⲥ ϩⲓϫⲛ̅ <text:line-break/><text:span text:style-name="T1"> </text:span><text:span text:style-name="T2">(13/21) </text:span> ⲙ̅ⲙⲟⲩⲉⲓⲟⲟⲩⲉ ⲙ̅ⲙⲁⲛ ⲁⲗⲗⲁ ⲛ̅ⲧⲁⲣⲉⲥⲛⲁⲩ <text:line-break/><text:span text:style-name="T1"> </text:span><text:span text:style-name="T2">(13/22) </text:span> ⲁⲧⲕⲁⲕⲓⲁ ⲉⲛⲧⲁⲥϣⲱⲡⲉ ⲁⲩⲱ ⲡϫⲓ ⲉⲛⲧⲁϥ‐ <text:line-break/><text:span text:style-name="T1"> </text:span><text:span text:style-name="T2">(13/23) </text:span> ϫⲓⲧϥ’ ⲛ̅ϭⲓ ⲡⲉⲥϣⲏⲣⲉ· ⲁⲥⲣ̅ⲙⲉⲧⲁⲛⲟⲉⲓ <text:line-break/><text:span text:style-name="T1"> </text:span><text:span text:style-name="T2">(13/24) </text:span> ⲁⲩⲱ ⲁⲩⲃ̅ϣⲉ ϣⲱⲡⲉ ⲛⲁⲥ ϩⲙ̅ ⲡⲕⲁⲕⲉ ⲛ̅‐ <text:line-break/><text:span text:style-name="T1"> </text:span><text:span text:style-name="T2">(13/25) </text:span> ⲧⲙ̅ⲛ̅ⲧ̅ⲁⲧⲥⲟⲟⲩⲛ ⲁⲩⲱ ⲁⲥⲁⲣⲭⲉⲓ ⲛ̅ϣⲓⲡⲉ <text:line-break/><text:span text:style-name="T1"> </text:span><text:span text:style-name="T2">(13/26) </text:span> ϩⲛ̅ ⲟⲩⲕⲓⲙ ⲡⲕⲓⲙ ⲇⲉ ⲡⲉ ⲡϣⲉⲉⲓ ⲁϥϫⲓ <text:line-break/><text:span text:style-name="T1"> </text:span><text:span text:style-name="T2">(13/27) </text:span> ⲇⲉ ⲛ̅ϭⲓ ⲡⲁⲩⲑⲁⲇⲏⲥ ⲛ̅ⲟⲩϭⲟⲙ ⲉⲃⲟⲗ ϩⲓ‐ <text:line-break/><text:span text:style-name="T1"> </text:span><text:span text:style-name="T2">(13/28) </text:span> ⲧⲛ̅ ⲧⲉϥⲙⲁⲁⲩ ⲛⲁϥⲟ ⲅⲁⲣ ⲛ̅ⲁⲧⲥⲟⲟⲩⲛ ⲉϥ‐ <text:line-break/><text:span text:style-name="T1"> </text:span><text:span text:style-name="T2">(13/29) </text:span> ⲙⲉⲉⲩⲉ ⲅⲁⲣ ϫⲉ ⲙⲛ̅ ϭ[ⲉ ϣⲟⲟ]ⲡ ⲉⲓⲙⲏⲧⲓ <text:line-break/><text:span text:style-name="T1"> </text:span><text:span text:style-name="T2">(13/30) </text:span> ⲁⲧⲉϥⲙⲁⲁⲩ ⲟⲩⲁⲁⲧ[ⲥ̅ ⲉϥⲛⲁⲩ] ⲇⲉ ⲁⲡⲁϣⲁⲓ̈ <text:line-break/><text:span text:style-name="T1"> </text:span><text:span text:style-name="T2">(13/31) </text:span> ⲛ̅ⲛ̅ⲁⲅⲅⲉⲗⲟⲥ ⲛⲁⲓ̈ ⲉⲛⲧ̣[ⲁϥⲥ]ⲟ̣ⲛⲧⲟⲩ ⲁϥϫⲓ‐ <text:line-break/><text:span text:style-name="T1"> </text:span><text:span text:style-name="T2">(13/32) </text:span> ⲥⲉ ϭⲉ ⲙ̅ⲙⲟϥ ⲉϩⲣⲁⲓ̈ ⲉϫⲱⲟⲩ ⲧⲙⲁⲁⲩ ⲇⲉ <text:line-break/><text:span text:style-name="T1"> </text:span><text:span text:style-name="T2">(13/33) </text:span> ⲛ̅ⲧⲁⲣⲉⲥⲙ̅ⲙⲉ ⲁⲧϩⲃⲥⲱ ⲙ̅ⲡⲕⲁⲕⲉ ϫⲉ ⲙ̅‐ <text:line-break/><text:span text:style-name="T1"> </text:span><text:span text:style-name="T2">(13/34) </text:span> ⲡⲉϥϣⲱⲡⲉ ϩⲛ̅ ⲟⲩϫⲱⲕ ⲁⲥⲙ̅ⲙⲉ ϭⲉ <text:line-break/><text:span text:style-name="T1"> </text:span><text:span text:style-name="T2">(13/35) </text:span> ϫⲉ ⲙ̅ⲡⲉϥⲣ̅ⲥⲩⲙⲫⲱⲛⲉⲓ ⲛⲙ̅ⲙⲁⲥ ⲛ̅‐ <text:line-break/><text:span text:style-name="T1"> </text:span><text:span text:style-name="T2">(13/36) </text:span> ϭⲓ ⲡⲉⲥϣⲃⲣ̅ ⲛ̅ϩⲱⲧ̅ⲣ̅ ⲁⲥⲣ̅ⲙⲉⲧⲁⲛⲟⲉⲓ <text:line-break/><text:span text:style-name="T1"> </text:span><text:span text:style-name="T2">(14/1) </text:span> ϩⲛ̅ ⲟⲩⲣⲓⲙⲉ ⲉⲛⲁϣⲱϥ ⲁⲩⲱ ⲁⲩⲥⲱⲧⲙ̅ ⲁ‐ <text:line-break/><text:span text:style-name="T1"> </text:span><text:span text:style-name="T2">(14/2) </text:span> ⲡⲥⲟⲡⲥ̅ ⲛ̅ⲧⲉⲥⲙⲉⲧⲁⲛⲟⲓⲁ ⲁⲩⲱ ⲁⲩⲉⲓⲛⲉ <text:line-break/><text:span text:style-name="T1"> </text:span><text:span text:style-name="T2">(14/3) </text:span> ⲛ̅ⲟⲩⲥⲙⲟⲩ ⲉϩⲣⲁⲓ̈ ϩⲁⲣⲟⲥ ⲛ̅ϭⲓ ⲡⲉⲡⲗⲏⲣⲱ‐ <text:line-break/><text:span text:style-name="T1"> </text:span><text:span text:style-name="T2">(14/4) </text:span> ⲙⲁ ⲧⲏⲣϥ ⲙ̅ⲡⲁϩⲟⲣⲁⲧⲟⲛ ⲙ̅ⲡⲁⲣⲑⲉⲛⲓⲕⲟⲛ <text:line-break/><text:span text:style-name="T1"> </text:span><text:span text:style-name="T2">(14/5) </text:span> ⲙ̅ⲡ̅ⲛ̅ⲁ̅ ⲁϥⲡⲱϩⲧ ⲉϩⲣⲁⲓ̈ ⲉϫⲱⲥ ⲛ̅ϭⲓ ⲡⲉ ⲡ̅ⲛⲁ̅ <text:line-break/><text:span text:style-name="T1"> </text:span><text:span text:style-name="T2">(14/6) </text:span> ⲉⲧⲟⲩⲁⲁⲃ ⲉⲃⲟⲗ ϩⲓⲧⲛ̅ ⲡⲉ→ⲩ←ⲡⲗⲏⲣⲱⲙⲁ ⲧⲏⲣϥ <text:line-break/><text:span text:style-name="T1"> </text:span><text:span text:style-name="T2">(14/7) </text:span> ⲛ̅ⲧⲁϥⲉⲓ ⲅⲁⲣ ⲛⲁⲥ ⲁⲛ ⲛ̅ϭⲓ ⲡⲉⲥϣⲃⲣ̅ ⲛ̅ϩⲱⲧⲣ̅ <text:line-break/><text:span text:style-name="T1"> </text:span><text:span text:style-name="T2">(14/8) </text:span> ⲁⲗⲗⲁ 〈ⲛ̅〉ⲧⲁϥⲉⲓ ⲛⲁⲥ ⲉϩⲣⲁⲓ̈ ϩⲓⲧⲛ̅ ⲡⲡⲗⲏⲣⲱⲙⲁ <text:line-break/><text:soft-page-break/><text:span text:style-name="T1"> </text:span><text:span text:style-name="T2">(14/9) </text:span> ϫⲉⲕⲁⲁⲥ ⲉϥⲛⲁⲥⲱϩⲉ ⲙ̅ⲡⲉⲥϣⲧⲁ ⲁⲩⲱ ⲁⲩⲉⲓ‐ <text:line-break/><text:span text:style-name="T1"> </text:span><text:span text:style-name="T2">(14/10) </text:span> ⲛⲉ ⲙ̅ⲙⲟⲥ ⲉϩⲣⲁⲓ̈ ⲁⲡⲥⲁⲓⲱⲛ ⲁⲛ ⲙ̅ⲙⲓⲛ ⲙ̅‐ <text:line-break/><text:span text:style-name="T1"> </text:span><text:span text:style-name="T2">(14/11) </text:span> ⲙⲟⲥ ⲁⲗⲗⲁ ⲛ̅ⲧⲡⲉ ⲙ̅ⲡⲉⲥϣⲏⲣⲉ ⲁⲧⲣⲉⲥϣⲱ‐ <text:line-break/><text:span text:style-name="T1"> </text:span><text:span text:style-name="T2">(14/12) </text:span> ⲡⲉ ϩⲙ̅ ⲡⲙⲁϩⲯⲓⲧ ϣⲁⲛⲧⲉⲥⲥⲱϩⲉ ⲙ̅ⲡⲉⲥ‐ <text:line-break/><text:span text:style-name="T1"> </text:span><text:span text:style-name="T2">(14/13) </text:span> ϣⲧⲁ ⲁⲩⲱ ⲟⲩⲥⲙⲏ ⲁⲥⲉⲓ ⲉⲃⲟⲗ ϩⲛ̅ ⲧⲡⲉ ⲛ̅ⲁⲓ‐ <text:line-break/><text:span text:style-name="T1"> </text:span><text:span text:style-name="T2">(14/14) </text:span> ⲱⲛ ⲉⲧϫⲟⲥⲉ ϫⲉ ϥϣⲟⲟⲡ’ ⲛ̅ϭⲓ ⲡⲣⲱⲙⲉ ⲁⲩⲱ <text:line-break/><text:span text:style-name="T1"> </text:span><text:span text:style-name="T2">(14/15) </text:span> ⲡ̣ϣⲏⲣⲉ ⲙ̅ⲡⲣⲱⲙⲉ ⲁϥⲥⲱⲧⲙ̅ ⲇⲉ ⲛ̅ϭⲓ ⲡⲣⲱ‐ <text:line-break/><text:span text:style-name="T1"> </text:span><text:span text:style-name="T2">(14/16) </text:span> ⲧⲁⲣⲭⲱⲛ ⲓ̈ⲁⲗⲧⲁⲃⲁⲱⲑ· ⲉϥⲙⲉⲉⲩⲉ ϫⲉ ⲛ̅ⲧⲁϯ‐ <text:line-break/><text:span text:style-name="T1"> </text:span><text:span text:style-name="T2">(14/17) </text:span> ⲥⲙⲏ ϣⲱⲡⲉ {ϣⲱⲡⲉ} ⲉⲃⲟⲗ ϩⲓⲧⲛ̅ ⲧⲉϥⲙⲁ‐ <text:line-break/><text:span text:style-name="T1"> </text:span><text:span text:style-name="T2">(14/18) </text:span> ⲁⲩ· ⲁⲩⲱ ⲙ̅ⲡⲉϥⲙ̅ⲙⲉ ϫⲉ ⲛ̅ⲧⲁⲥⲉⲓ ⲧⲱⲛ ⲁⲩⲱ <text:line-break/><text:span text:style-name="T1"> </text:span><text:span text:style-name="T2">(14/19) </text:span> ⲁϥⲧⲥⲉⲃⲟⲟⲩ ⲛ̅ϭⲓ ⲡⲙⲏⲧⲣⲟⲡⲁⲧⲱⲣ ⲉⲧⲟⲩⲁⲁⲃ <text:line-break/><text:span text:style-name="T1"> </text:span><text:span text:style-name="T2">(14/20) </text:span> ⲁⲩⲱ ⲡⲧⲉⲗⲉⲓⲟⲥ ⲧⲉⲡⲣⲟⲛⲟⲓⲁ· ⲉⲧϫⲏⲕ ⲉⲃⲟⲗ <text:line-break/><text:span text:style-name="T1"> </text:span><text:span text:style-name="T2">(14/21) </text:span> ⲧϩⲓⲕⲱⲛ ⲙ̅ⲡⲓⲁϩⲟⲣⲁⲧⲟⲥ ⲉⲧⲉ ⲡⲁⲓ̈ ⲡⲉ ⲡⲉⲓⲱⲧ <text:line-break/><text:span text:style-name="T1"> </text:span><text:span text:style-name="T2">(14/22) </text:span> ⲙ̅ⲡⲧⲏⲣϥ ⲡⲁⲓ̈ ⲉⲛⲧⲁⲡⲧⲏⲣϥ ϣⲱⲡⲉ ⲛ̅ϩⲏⲧϥ <text:line-break/><text:span text:style-name="T1"> </text:span><text:span text:style-name="T2">(14/23) </text:span> ⲡϣⲟⲣⲡ’ ⲛ̅ⲣⲱⲙⲉ ϫⲉ ϩⲛ̅ ⲟⲩⲧⲩⲡⲟⲥ ⲛ̅ⲁⲛⲇⲣⲉ‐ <text:line-break/><text:span text:style-name="T1"> </text:span><text:span text:style-name="T2">(14/24) </text:span> ⲁⲥ ⲁϥⲟⲩⲱⲛϩ ⲉⲃⲟⲗ ⲙ̅ⲡⲉϥⲉⲓⲛⲉ ⲁⲩⲱ ⲁϥ‐ <text:line-break/><text:span text:style-name="T1"> </text:span><text:span text:style-name="T2">(14/25) </text:span> ⲥⲧⲱⲧ’ ⲧⲏⲣϥ ⲛ̅ϭⲓ ⲡⲁⲓⲱⲛ ⲙ̅ⲡⲣⲱⲧⲁⲣⲭⲱⲛ <text:line-break/><text:span text:style-name="T1"> </text:span><text:span text:style-name="T2">(14/26) </text:span> ⲁⲩⲱ ⲁⲛⲥⲛ̅ⲧⲉ ⲙ̅ⲡⲛⲟⲩⲛ ⲁⲩⲕⲓⲙ ⲁⲩⲱ ⲉⲃⲟⲗ <text:line-break/><text:span text:style-name="T1"> </text:span><text:span text:style-name="T2">(14/27) </text:span> ϩⲓⲧⲛ̅ ⲙ̅ⲙⲟⲩⲉⲓⲟⲟⲩⲉ ⲛⲁⲓ̈ ⲉⲧϣⲟⲟⲡ ϩⲓϫⲛ̅ <text:line-break/><text:span text:style-name="T1"> </text:span><text:span text:style-name="T2">(14/28) </text:span> ⲧϩⲩⲗⲏ ⲁϥⲣ̣̅ ⲟ̣[ⲩⲟⲉⲓ]ⲛ ⲛ̅ϭⲓ ⲡⲥⲁⲙⲡⲓⲧⲛ̅ ⲉⲃⲟⲗ <text:line-break/><text:span text:style-name="T1"> </text:span><text:span text:style-name="T2">(14/29) </text:span> ϩⲓⲧⲙ̅ ⲡⲟⲩ[ⲱⲛϩ ⲉⲃⲟ]ⲗ ⲛ̅ⲧⲉϥϩⲓⲕⲱⲛ ⲧⲁⲓ̈ ⲉⲛ‐ <text:line-break/><text:span text:style-name="T1"> </text:span><text:span text:style-name="T2">(14/30) </text:span> ⲧⲁⲥⲟⲩⲱⲛϩ[ⲥ̅ ⲁⲩ]ⲱ ⲛ̅ⲧⲁⲣⲟⲩⲉⲓⲱⲣⲙⲉ ⲛ̅ϭⲓ <text:line-break/><text:span text:style-name="T1"> </text:span><text:span text:style-name="T2">(14/31) </text:span> ⲛⲉⲝⲟⲩⲥⲓⲁ ⲧⲏⲣⲟⲩ ⲁⲩⲱ ⲡⲣⲱⲧⲁⲣⲭⲱⲛ ⲁⲩ‐ <text:line-break/><text:span text:style-name="T1"> </text:span><text:span text:style-name="T2">(14/32) </text:span> ⲛⲁⲩ ⲁⲡⲙⲉⲣⲟⲥ ⲧⲏⲣϥ ⲙ̅ⲡⲥⲁⲙⲡ→ⲓ←ⲧⲛⲉ ⲉⲁϥⲣ̅‐ <text:line-break/><text:span text:style-name="T1"> </text:span><text:span text:style-name="T2">(14/33) </text:span> ⲟⲩⲟⲉⲓⲛ ⲁⲩⲱ ⲉⲃⲟⲗ ϩⲓⲧⲙ̅ ⲡⲟⲩⲟⲉⲓⲛ ⲁⲩⲛⲁⲩ <text:line-break/><text:span text:style-name="T1"> </text:span><text:span text:style-name="T2">(14/34) </text:span> ϩⲣⲁⲓ̈ ϩⲙ̅ ⲡⲙⲟⲟⲩ ⲁⲡⲧⲩⲡⲟⲥ ⲛ̅ⲧϩⲓⲕⲱⲛ <text:line-break/><text:span text:style-name="T1"> </text:span><text:span text:style-name="T2">(15/1) </text:span> ⲁⲩⲱ ⲡⲉϫⲁϥ ⲛ̅ⲉⲝⲟⲩⲥⲓⲁ ⲉⲧϣⲟⲟⲡ’ ϣⲁⲣⲟϥ <text:line-break/><text:span text:style-name="T1"> </text:span><text:span text:style-name="T2">(15/2) </text:span> ϫⲉ ⲁⲙⲏⲉⲓⲛⲉ ⲛ̅ⲧⲛ̅ⲧⲁⲙⲓⲟ ⲛ̅ⲟⲩⲣⲱⲙⲉ ⲕⲁⲧⲁ <text:line-break/><text:span text:style-name="T1"> </text:span><text:span text:style-name="T2">(15/3) </text:span> ⲑⲓⲕⲱⲛ ⲙ̅ⲡⲛⲟⲩⲧⲉ ⲁⲩⲱ ⲕⲁⲧⲁ ⲡⲛ̅ⲉⲓⲛⲉ ϫⲉ‐ <text:line-break/><text:span text:style-name="T1"> </text:span><text:span text:style-name="T2">(15/4) </text:span> ⲕⲁⲁⲥ ⲁⲣⲉⲧⲉϥϩⲓⲕⲱⲛ ⲛⲁϣⲱⲡⲉ ⲛⲁⲛ ⲛ̅ⲟⲩⲟ‐ <text:line-break/><text:span text:style-name="T1"> </text:span><text:span text:style-name="T2">(15/5) </text:span> ⲉⲓⲛ ⲁⲩⲱ ⲁⲩⲧⲁⲙⲓⲟ ⲉⲃⲟⲗ ϩⲓⲧⲛ̅ ⲛ̅ϭⲟⲙ ⲛ̅ⲛⲟⲩ‐ <text:line-break/><text:span text:style-name="T1"> </text:span><text:span text:style-name="T2">(15/6) </text:span> ⲉⲣⲏⲩ· ⲕⲁⲧⲁ ⲙ̅ⲙⲁⲓ̈ⲛ ⲉⲛⲧⲁⲩϯ ⲙ̅ⲙⲟⲟⲩ ⲁⲩⲱ <text:line-break/><text:span text:style-name="T1"> </text:span><text:span text:style-name="T2">(15/7) </text:span> ⲧⲟⲩⲉⲓⲉ ⲧⲟⲩⲉⲓⲉ ⲛ̅ⲉⲝⲟⲩⲥⲓⲁ ⲁⲩϯ ⲛ̅ⲟⲩⲙⲁⲉⲓⲛ <text:line-break/><text:span text:style-name="T1"> </text:span><text:span text:style-name="T2">(15/8) </text:span> ⲛ̅ϩⲣⲁⲓ̈ ϩⲙ̅ ⲡⲧⲩⲡⲟⲥ ⲛ̅ⲧϩⲓⲕⲱⲛ ⲧⲁⲓ̈ ⲉⲛⲧⲁϥⲛⲁⲩ <text:line-break/><text:span text:style-name="T1"> </text:span><text:span text:style-name="T2">(15/9) </text:span> ⲉⲣⲟⲥ ϩⲣⲁⲓ̈ ϩⲛ̅ ⲧⲉϥⲯⲩⲭⲓⲕⲏ ⲁϥⲧⲁⲙⲓⲟ ⲛ̅ⲟⲩϩⲩ‐ <text:line-break/><text:span text:style-name="T1"> </text:span><text:span text:style-name="T2">(15/10) </text:span> ⲡⲟⲥⲧⲁⲥⲓⲥ ⲕⲁⲧⲁ ⲡⲓⲛⲉ ⲙ̅ⲡϣⲟⲣⲡ’ ⲛ̅ⲣⲱⲙⲉ ⲛ̅‐ <text:line-break/><text:span text:style-name="T1"> </text:span><text:span text:style-name="T2">(15/11) </text:span> ⲧⲉⲗⲉⲓⲟⲥ ⲁⲩⲱ ⲡⲉϫⲁⲩ ϫⲉ ⲙⲁⲣⲛ̅ⲙⲟⲩⲧⲉ ⲉⲣⲟϥ <text:line-break/><text:span text:style-name="T1"> </text:span><text:span text:style-name="T2">(15/12) </text:span> ϫⲉ ⲁⲇⲁⲙ’ ϫⲉⲕⲁⲁⲥ ⲉⲣⲉⲡⲉϥⲣⲁⲛ ⲛⲁϣⲱⲡⲉ <text:line-break/><text:span text:style-name="T1"> </text:span><text:span text:style-name="T2">(15/13) </text:span> ⲛⲁⲛ ⲛ̅ⲟⲩϭⲟⲙ ⲛ̅ⲟⲩⲟⲉⲓⲛ ⲁⲩⲱ ⲁⲩⲁⲣⲭⲉⲓ ⲛ̅ϭⲓ <text:line-break/><text:span text:style-name="T1"> </text:span><text:span text:style-name="T2">(15/14) </text:span> ⲛ̅ⲇⲩⲛⲁⲙⲓⲥ· ⲧϣⲟⲣⲡ ⲧⲙ̅ⲛ̅ⲧ̅ⲭⲣⲏⲥⲧⲟⲥ ⲁⲥⲧⲁ‐ <text:line-break/><text:span text:style-name="T1"> </text:span><text:span text:style-name="T2">(15/15) </text:span> ⲙⲓⲟ ⲛ̅ⲟⲩⲯⲩⲭⲏ ⲛ̅ⲕⲁⲥ ⲧⲙⲉϩⲥⲛ̅ⲧⲉ ⲇⲉ ⲧⲡⲣⲟ‐ <text:line-break/><text:span text:style-name="T1"> </text:span><text:span text:style-name="T2">(15/16) </text:span> ⲛⲟⲓⲁ ⲁⲥⲧⲁⲙⲓⲟ ⲛ̅ⲟⲩⲯⲩⲭⲏ ⲙ̅ⲙⲟⲩⲧ’ ⲧⲙⲉϩ‐ <text:line-break/><text:span text:style-name="T1"> </text:span><text:span text:style-name="T2">(15/17) </text:span> ϣⲟⲙⲧⲉ ⲧⲙ̅ⲛ̅ⲧ̅ⲛⲟⲩⲧⲉ ⲁⲥⲧⲁⲙⲓⲟ ⲛ̅ⲟⲩⲯⲩⲭⲏ <text:line-break/><text:span text:style-name="T1"> </text:span><text:span text:style-name="T2">(15/18) </text:span> ⲛ̅ⲥⲁⲣⲝ· ⲧⲙⲉϩϥⲧⲟⲉ ⲇⲉ ⲧⲉ ⲧⲙ̅ⲛ̅ⲧ̅ϫⲟⲉⲓⲥ ⲁⲥⲧⲁ‐ <text:line-break/><text:span text:style-name="T1"> </text:span><text:span text:style-name="T2">(15/19) </text:span> ⲙⲓⲟ ⲛ̅ⲟⲩⲯⲩⲭⲏ ⲛ̅ⲁⲧⲕⲁⲥ· ⲧⲙⲉϩϯⲉ ⲧⲉ ⲧⲙⲛ̅‐ <text:line-break/><text:span text:style-name="T1"> </text:span><text:span text:style-name="T2">(15/20) </text:span> ⲧⲉⲣⲟ· ⲁⲥⲧⲁⲙⲓⲟ ⲛ̅ⲟⲩⲯⲩⲭⲏ ⲛ̅ⲥⲛⲟϥ ⲧⲙⲉϩ‐ <text:line-break/><text:span text:style-name="T1"> </text:span><text:span text:style-name="T2">(15/21) </text:span> ⲥⲟⲉ ⲡⲉ ⲡⲕⲱϩ ⲁⲥⲧⲁⲙⲓⲟ ⲛ̅ⲟⲩⲯⲩⲭⲏ ⲛ̅ϣⲁ‐ <text:line-break/><text:soft-page-break/><text:span text:style-name="T1"> </text:span><text:span text:style-name="T2">(15/22) </text:span> ⲁⲣⲉ ⲧⲙⲉϩⲥⲁϣϥⲉ ⲧⲉ ⲧⲙ̅ⲛ̅ⲧ̅ⲣⲙⲛ̅ϩⲏⲧ’ ⲁⲥⲧⲁ‐ <text:line-break/><text:span text:style-name="T1"> </text:span><text:span text:style-name="T2">(15/23) </text:span> ⲙⲓⲟ ⲛ̅ⲟⲩⲯⲩⲭⲏ ⲛ̅ϥⲟⲩϩⲉ ⲁⲩⲁϩⲉ ⲇⲉ ⲉⲣⲁⲧⲟⲩ <text:line-break/><text:span text:style-name="T1"> </text:span><text:span text:style-name="T2">(15/24) </text:span> ⲉⲣⲟϥ ⲛ̅ϭⲓ ⲡⲁϣⲁⲓ̈ ⲛ̅ⲛ̅ⲁⲅⲅⲉⲗⲟⲥ ⲁⲩϫⲓ ⲉⲃⲟⲗ <text:line-break/><text:span text:style-name="T1"> </text:span><text:span text:style-name="T2">(15/25) </text:span> ϩⲓⲧⲛ̅ ⲛ̅ⲉⲝⲟⲩⲥⲓⲁ ⲛ̅ⲧⲥⲁϣϥⲉ ⲛ̅ϩⲩⲡⲟⲥⲧⲁⲥⲓⲥ <text:line-break/><text:span text:style-name="T1"> </text:span><text:span text:style-name="T2">(15/26) </text:span> ⲛ̅ⲧⲉ ⲧⲯⲩⲭⲓⲕⲏ ϫⲉⲕⲁⲁⲥ ⲉⲩⲛⲁⲧⲁⲙⲓⲟ ⲙ̅‐ <text:line-break/><text:span text:style-name="T1"> </text:span><text:span text:style-name="T2">(15/27) </text:span> ⲡϫⲱⲛϥ ⲛⲙ̅ⲙⲉⲗⲟⲥ ⲙⲛ̅ ⲡϫⲱⲛϥ ⲛ̅ⲛ̅ϣⲁⲩ <text:line-break/><text:span text:style-name="T1"> </text:span><text:span text:style-name="T2">(15/28) </text:span> ⲙⲛ̅ ⲧⲥⲩⲛⲑⲉⲥⲓⲥ ⲙ̅ⲡⲧⲥⲁⲛ̣ⲟ ⲙ̅ⲡⲟⲩⲁ ⲡⲟⲩⲁ <text:line-break/><text:span text:style-name="T1"> </text:span><text:span text:style-name="T2">(15/29) </text:span> ⲛⲙ̅ⲙⲉⲗⲟⲥ ⲡϣⲟⲣⲡ ⲙ̣[ⲉⲛ ⲁϥⲁⲣ]ⲭ̣ⲉⲓ ⲛ̅ⲧⲁⲙⲓⲟ <text:line-break/><text:span text:style-name="T1"> </text:span><text:span text:style-name="T2">(15/30) </text:span> ⲛ̅ⲧⲁⲡⲉ ⲉⲧ̅ⲉ̅ⲣ̅ⲁ̅ⲫ̅ⲁ̅ⲱ̅ⲡ̣̅̅[̅ⲉ̅] ⲁ̣[ⲃⲣⲱ]ⲛ̣ ⲁϥⲧⲁⲙⲓⲟ <text:line-break/><text:span text:style-name="T1"> </text:span><text:span text:style-name="T2">(15/31) </text:span> ⲛ̅ϫⲱϥ ⲙⲏ̅ⲛ̅ⲓ̅ⲅ̅ⲅ̅ⲉ̅ⲥ̅ⲥ̅ⲧ̅ⲣ̅ⲱ̅ⲏ̅ⲑ̅ ⲁϥⲧⲁⲙⲓⲟ ⲙ̅‐ <text:line-break/><text:span text:style-name="T1"> </text:span><text:span text:style-name="T2">(15/32) </text:span> ⲡⲉⲛⲕⲉⲫⲁⲗⲟⲥ ⲁ̅ⲥ̅ⲧ̅ⲉ̅ⲣ̅ⲉ̅ⲭ̅ⲙ̅ⲏ̅ⲛ̅ ⲡⲃⲁⲗ ⲛ̅ⲟⲩ <text:line-break/><text:span text:style-name="T1"> </text:span><text:span text:style-name="T2">(15/33) </text:span> ⲛⲁⲙ· ⲑⲁ̅ⲥ̅ⲡ̅ⲟ̅ⲙ̅ⲟ̅ⲭ̅ⲁ̅ⲙ̅ ⲡⲃⲁⲗ ⲛ̅ϭⲃⲟⲩⲣ ⲓ̅ⲉⲣⲱ̅‐ <text:line-break/><text:span text:style-name="T1"> </text:span><text:span text:style-name="T2">(15/34) </text:span> ⲛⲩ̅ⲙ̅ⲟ̅ⲥ̅ ⲡⲙⲁⲁϫⲉ ⲛ̅ⲟⲩⲛⲁⲙ ⲃⲓ̅ⲥⲥⲟⲩⲙ̅ <text:line-break/><text:span text:style-name="T1"> </text:span><text:span text:style-name="T2">(15/35) </text:span> ⲡⲙⲁⲁϫⲉ ⲛ̅ϭⲃⲟⲩⲣ ⲁⲕ̅ⲓ̅ⲱ̅ⲣ̅ⲉ̅ⲓ̅ⲙ̅ ⲙ̅ⲡϣⲁ <text:line-break/><text:span text:style-name="T1"> </text:span><text:span text:style-name="T2">(16/1) </text:span> ⲃⲁ̅ⲛ̅ⲏ̅ⲛ̅·̅ ̅ⲉ̅ⲫ̅ⲣ̅ⲟ̅ⲩ̅ⲙ̅ ⲛ̅ⲛⲉⲥⲡⲟⲧⲟⲩ ⲁⲙⲏⲛ <text:line-break/><text:span text:style-name="T1"> </text:span><text:span text:style-name="T2">(16/2) </text:span> ⲛ̅ⲛⲟⲃϩⲉ ⲓ̅ⲃ̅ⲓ̅ⲕ̅ⲁ̅ⲛ̅ ⲛ̅ⲛⲁϫϩⲉ ⲃⲁ̅ⲥⲓⲗⲓⲁⲇⲏⲙⲏ̅ <text:line-break/><text:span text:style-name="T1"> </text:span><text:span text:style-name="T2">(16/3) </text:span> ⲙ̅ⲡⲁⲣⲓⲥⲑⲙⲓⲟⲛ ⲁ̅ⲭ̅ⲭ̅ⲁ̅ⲛ̅ ⲥ̅ⲧⲁⲫⲩⲗⲏ̅ ⲁ̅ⲇⲁ̅‐ <text:line-break/><text:span text:style-name="T1"> </text:span><text:span text:style-name="T2">(16/4) </text:span> ⲃ̅ⲁ̅ⲛ̅· ⲙ̅ⲡⲙⲟⲩⲧ ⲭⲁ̅ⲁⲙⲁⲛ̅ ⲙ̅ⲡⲥⲫⲟⲛⲧⲩⲗⲟⲥ <text:line-break/><text:span text:style-name="T1"> </text:span><text:span text:style-name="T2">(16/5) </text:span> ⲇⲉ̅ⲁ̅ⲣ̅ⲭ̅ⲱ̅ ⲛ̅ⲧϣⲟⲩⲱⲃⲉ ⲧⲏ̅ⲃⲁⲣ̅ ⲛ̅ⲧⲛⲁϩⲃⲉ <text:line-break/><text:span text:style-name="T1"> </text:span><text:span text:style-name="T2">(16/6) </text:span> ⲛ̅ϭⲃⲟⲩⲣ ⲙⲛ̅ⲓ̅ⲁ̅ⲣ̅ⲭ̅ⲱ̅ⲛ̅ ⲙ̅ⲡⲕⲉⲗⲉⲛⲕⲉϩ ⲛ̅‐ <text:line-break/><text:span text:style-name="T1"> </text:span><text:span text:style-name="T2">(16/7) </text:span> ϭⲃⲟⲩⲣ ⲁⲃ̅ⲓ̅ⲧ̅ⲣ̅ⲓ̅ⲱ̅ⲛ̅ ⲛ̅ⲑⲱⲙⲉ ⲛ̅ⲟⲩⲛⲁⲙ ⲉ̅ⲩ̅‐ <text:line-break/><text:span text:style-name="T1"> </text:span><text:span text:style-name="T2">(16/8) </text:span> ⲁ̅ⲛ̅ⲑ̅ⲏ̅ⲛ̅ ⲛ̅ⲑⲱⲙⲉ ⲛ̅ϭⲃⲟⲩⲣ ⲕ̅ⲣⲩⲥ̅ ⲛ̅ⲧϭⲓϫ <text:line-break/><text:span text:style-name="T1"> </text:span><text:span text:style-name="T2">(16/9) </text:span> ⲛ̅ⲟⲩⲛⲁⲙ ⲃⲏ̅ⲗ̅ⲩ̅ⲁ̅ⲓ̅ ⲛ̅ⲧϭⲓϫ ⲛ̅ϭⲃⲟⲩⲣ ⲧ̅ⲣⲏ̅‐ <text:line-break/><text:span text:style-name="T1"> </text:span><text:span text:style-name="T2">(16/10) </text:span> ⲛ̅ⲉ̅ⲩ̅ ⲛ̅ⲛ̅ⲧⲏⲃⲉ· ⲛ̅ⲧϭⲓϫ ⲛ̅ⲛⲟⲩⲛⲁⲙ ⲃⲁ̅ⲗⲃⲏⲗ̅ <text:line-break/><text:span text:style-name="T1"> </text:span><text:span text:style-name="T2">(16/11) </text:span> ⲛ̅ⲛ̅ⲧⲏⲃⲉ ⲛ̅ⲧϭⲓϫ ⲛ̅ϭⲟⲩⲣ ⲕⲣⲓⲙⲁ ⲛ̅ⲛ̅ⲉⲓⲉ‐ <text:line-break/><text:span text:style-name="T1"> </text:span><text:span text:style-name="T2">(16/12) </text:span> ⲃⲉ ⲛ̅ⲛ̅ϭⲓϫ ⲁ̅ⲥ̅ⲧ̅ⲣ̅ⲱ̅ⲯ̅ ⲛ̅ⲧϭⲓⲃⲉ ⲛ̅ⲟⲩⲛⲁⲙ <text:line-break/><text:span text:style-name="T1"> </text:span><text:span text:style-name="T2">(16/13) </text:span> ⲃ̅ⲁ̅ⲣ̅ⲣ̅ⲱ̅ⲫ̅ ⲛ̅ⲧϭⲓⲃⲉ ⲛ̅ϭⲃⲟⲩⲣ ⲃⲁⲟ̅ⲩⲙ̅ ⲙ̅ⲡϫⲱ <text:line-break/><text:span text:style-name="T1"> </text:span><text:span text:style-name="T2">(16/14) </text:span> ⲛ̅ⲟⲩⲛⲁⲙ ⲁⲣ̅ⲁ̅ⲣ̅ⲓ̅ⲙ̅ ⲙ̅ⲡϫⲱ ⲛ̅ϭⲃⲟⲩⲣ ⲁⲣ̅ⲉⲭ̅ <text:line-break/><text:span text:style-name="T1"> </text:span><text:span text:style-name="T2">(16/15) </text:span> ⲛ̅ⲧⲕⲟⲓⲗⲓⲁ ⲫⲑⲁⲩⲏ ⲛ̅ⲑⲟⲗⲡⲉ ⲥⲏⲛⲁⲫⲓⲙ <text:line-break/><text:span text:style-name="T1"> </text:span><text:span text:style-name="T2">(16/16) </text:span> ⲙ̅ⲡⲩⲡⲟⲭⲟⲛ〈ⲇ〉ⲣⲓⲟⲥ ⲁⲣ̅ⲁ̅ⲭ̅ⲉ̅ⲑ̅ⲱ̅ⲡ̅ⲓ̅ ⲙ̅ⲡⲥⲡⲓⲣ <text:line-break/><text:span text:style-name="T1"> </text:span><text:span text:style-name="T2">(16/17) </text:span> ⲛ̅ⲟⲩⲛⲁⲙ ⲍⲁ̅ⲃ̅ⲉ̅ⲇ̅ⲱ̅ ⲙ̅ⲡⲥⲡⲓⲣ ⲛ̅ϭⲃⲟⲩⲣ <text:line-break/><text:span text:style-name="T1"> </text:span><text:span text:style-name="T2">(16/18) </text:span> ⲃⲁ̅ⲣ̅ⲓ̅ⲁ̅ⲥ̅ ⲛ̅ⲧϯⲡⲉ ⲛ̅ϭⲃⲟⲩⲣ ⲁ̅ⲃⲏⲛⲗⲉⲛⲁⲣⲭⲉⲓ̅ <text:line-break/><text:span text:style-name="T1"> </text:span><text:span text:style-name="T2">(16/19) </text:span> ⲛ̅ⲛⲁⲧⲕⲁⲥ ⲭⲛ̅ⲟ̅ⲩ̅ⲙ̅ⲉ̅ⲛ̅ⲓ̅ⲛ̅ⲟ̅ⲣ̅ⲓ̅ⲛ̅ ⲛ̅ⲛ̅ⲕⲉⲉⲥ <text:line-break/><text:span text:style-name="T1"> </text:span><text:span text:style-name="T2">(16/20) </text:span> ⲅ̅ⲏ̅ⲥ̅ⲟ̅ⲗ̅ⲉ̅ ⲙ̅ⲡⲥⲧⲟⲙⲁⲭⲟⲥ ⲁⲅ̅ⲣⲟⲙⲁⲩⲙⲁ̅ ⲙ̅‐ <text:line-break/><text:span text:style-name="T1"> </text:span><text:span text:style-name="T2">(16/21) </text:span> ⲫⲏⲧ ⲃ̅ⲁ̅ⲛ̅ⲱ̅ ⲙ̅ⲡⲛⲉⲩⲙⲟⲛⲓⲛ ⲥⲱ̅ⲥⲧⲣⲁⲡⲁⲗ̅ <text:line-break/><text:span text:style-name="T1"> </text:span><text:span text:style-name="T2">(16/22) </text:span> ⲙ̅ⲡϩⲏⲡⲁⲣ ⲁⲛ̅ⲏ̅ⲥ̅ⲓ̅ⲙ̅ⲁ̅ⲗ̅ⲁ̅ⲣ̅ ⲙ̅ⲡⲥⲡⲗⲏⲛ ⲑ̅ⲱ̅‐ <text:line-break/><text:span text:style-name="T1"> </text:span><text:span text:style-name="T2">(16/23) </text:span> ⲡ̅ⲓ̅ⲑ̅ⲣ̅ⲱ̅ ⲛ̅ⲛⲙⲉϩⲧ ⲃ̅ⲓⲃⲗⲱ̅ ⲛ̅ⲛ̅ϭⲗⲁⲧⲉ <text:line-break/><text:span text:style-name="T1"> </text:span><text:span text:style-name="T2">(16/24) </text:span> ⲣⲟⲉⲣⲱⲣ ⲛ̅ⲙⲙⲟⲩⲧ ⲧⲁⲫ̅ⲣ̅ⲉ̅ⲱ̅ ⲛ̅ⲛ̅ϫⲓⲥⲉ <text:line-break/><text:span text:style-name="T1"> </text:span><text:span text:style-name="T2">(16/25) </text:span> ⲙ̅ⲡⲥⲱⲙⲁ ⲓⲡ̅ⲟ̅ⲩ̅ⲥ̅ⲡ̅ⲟ̅ⲃ̅ⲱ̅ⲃ̅ⲁ̅ ⲛ̅ⲛ̅ⲫⲗⲉⲯ <text:line-break/><text:span text:style-name="T1"> </text:span><text:span text:style-name="T2">(16/26) </text:span> ⲃⲓⲛⲉⲃⲟⲣⲓⲛ ⲛ̅ⲁⲣ̅ⲧ̅ⲏ̅ⲣ̅ⲓ̅ⲁ̅ ⲁⲁⲧ̅ⲟⲓⲙⲉⲛⲯⲏⲫⲉⲓ̅ <text:line-break/><text:span text:style-name="T1"> </text:span><text:span text:style-name="T2">(16/27) </text:span> ⲛⲱⲟⲩ ⲛⲉ ⲛ̅ⲛⲓϥⲉ ⲉⲧϩⲛ̅ ⲙⲙⲉⲗⲟⲥ ⲧⲏⲣⲟⲩ <text:line-break/><text:span text:style-name="T1"> </text:span><text:span text:style-name="T2">(16/28) </text:span> ⲏ̅ⲛ̅ⲑⲟⲗⲗⲉⲓⲁ̣ ⲛ̣̅ⲧⲥⲁⲣⲝ ⲧⲏⲣ̅ⲥ̅ ⲃⲉⲇⲟⲩⲕ <text:line-break/><text:span text:style-name="T1"> </text:span><text:span text:style-name="T2">(16/29) </text:span> ⲙ̅ⲡⲧⲉⲧⲉ [ⲛ̅ⲟⲩⲛⲁⲙ] ⲁⲣⲁⲃⲏⲉⲓ ⲡⲃⲁϩ ⲛ̅ϭⲃⲟⲩⲣ <text:line-break/><text:span text:style-name="T1"> </text:span><text:span text:style-name="T2">(16/30) </text:span> ⲉⲓⲗⲱ ⲛ̅ⲁⲧⲣ̣[ⲉⲩⲉ] ⲥ̣ⲱⲣⲙⲁ ⲛ̅ⲉⲇⲩⲟⲛ ⲅⲟ̅ⲣ̅ⲙ̅ⲁ̅‐ <text:line-break/><text:span text:style-name="T1"> </text:span><text:span text:style-name="T2">(16/31) </text:span> ⲕⲁ̅ⲓ̅ⲟ̅ⲭ̅ⲗ̅ⲁ̅ⲃ̅ⲁ̅ⲣ̅ ⲡⲙⲏⲣⲟⲥ ⲛ̅ⲟⲩⲛⲁⲙ ⲛⲉ̅ⲃⲣⲓⲑ̅ <text:line-break/><text:span text:style-name="T1"> </text:span><text:span text:style-name="T2">(16/32) </text:span> ⲡⲙⲏⲣⲟⲥ ⲛ̅ϭⲃⲟⲩⲣ ⲯⲏ̅ⲣ̅ⲏ̅ⲙ̅ ⲛ̅ϭⲗⲁⲧⲉ ⲛ̅‐ <text:line-break/><text:span text:style-name="T1"> </text:span><text:span text:style-name="T2">(16/33) </text:span> ⲧⲟⲩⲣⲏⲧⲉ ⲛ̅ⲟⲩⲛⲁⲙ’ ⲁⲥⲁⲕⲗⲁⲥ ⲧϭⲗⲱⲧ <text:line-break/><text:soft-page-break/><text:span text:style-name="T1"> </text:span><text:span text:style-name="T2">(16/34) </text:span> ⲛ̅ϭⲃⲟⲩⲣ ⲟⲣ̅ⲙ̅ⲁ̅ⲱ̅ⲑ̅ ⲙ̅ⲡⲛⲉⲧ ⲛ̅ⲟⲩⲛⲁⲙ <text:line-break/><text:span text:style-name="T1"> </text:span><text:span text:style-name="T2">(16/35) </text:span> [ⲏ]ⲙ̣ⲏⲛⲩⲛ ⲙ̅ⲡⲡⲛⲉⲧ ⲛ̅ϭⲃⲟⲩⲣ ⲕ̅ⲛ̅ⲩ̅ⲝ̅ ⲧⲥⲏ‐ <text:line-break/><text:span text:style-name="T1"> </text:span><text:span text:style-name="T2">(17/1) </text:span> ⲃⲉ ⲛ̅ⲟⲩⲛⲁⲙ ⲧ̅ⲩ̅ⲡ̅ⲏ̅ⲗ̅ⲟ̅ ⲛⲧⲥⲏⲃⲉ ⲛ̅ϭⲃⲟⲩⲣ <text:line-break/><text:span text:style-name="T1"> </text:span><text:span text:style-name="T2">(17/2) </text:span> ⲁ̅ⲭ̅ⲓ̅ⲏ̅ⲗ̅ ⲛ̅ⲧⲕⲗ̅ⲗⲉ ⲛ̅ⲟⲩⲛⲁⲙ ⲫⲛ̅ⲏⲙⲏ̅ ⲛ̅ⲧⲕⲗ̅‐ <text:line-break/><text:span text:style-name="T1"> </text:span><text:span text:style-name="T2">(17/3) </text:span> ⲗⲉ ⲛ̅ϭⲃⲟⲩⲣ ⲫⲓ̅ⲟ̅ⲩ̅ⲑ̅ⲣ̅ⲟ̅ⲙ̅ ⲛ̅ⲧⲟⲩⲣⲏⲧⲉ ⲛ̅ⲟⲩ‐ <text:line-break/><text:span text:style-name="T1"> </text:span><text:span text:style-name="T2">(17/4) </text:span> ⲛ̅ⲁ̅ⲙ̅ ⲃⲟ̅ⲁⲃⲉⲗ̅ ⲛ̅ⲛⲉⲥⲧⲏⲏⲃⲉ ⲧⲣⲁⲭⲟⲩⲛ ⲛ̅‐ <text:line-break/><text:span text:style-name="T1"> </text:span><text:span text:style-name="T2">(17/5) </text:span> ⲧⲟⲩⲣⲏⲧⲉ ⲛ̅ϭⲃⲟⲩⲣ ⲫⲓ̅ⲕ̅ⲛ̅ⲁ̅ ⲛ̅ⲛⲉⲥⲧⲏⲏⲃⲉ <text:line-break/><text:span text:style-name="T1"> </text:span><text:span text:style-name="T2">(17/6) </text:span> ⲙⲓⲁⲙⲁⲓ· ⲛ̅ⲉⲓⲉⲓⲃ ⲛ̅ⲛⲟⲩⲣⲏⲧⲉ ⲗⲁ̅ⲃ̅ⲏ̅ⲣ̅ⲛ̅ⲓ̅ⲟ̅ⲩ̅ⲙ̅ <text:line-break/><text:span text:style-name="T1"> </text:span><text:span text:style-name="T2">(17/7) </text:span> ⲛⲉⲛⲧⲁⲩⲧⲟϣⲟⲩ ⲇⲉ ⲉϩⲣⲁⲓ̈ ⲉϫⲛ̅ ⲛⲁⲓ̈ ⲧⲏⲣⲟⲩ <text:line-break/><text:span text:style-name="T1"> </text:span><text:span text:style-name="T2">(17/8) </text:span> ⲡⲉ ⲍⲁ̅ⲑ̅ⲱ̅ⲑ̅ ⲁ̅ⲣⲙⲁⲥ̅ ⲕ̅ⲁⲗⲓⲗⲁⲓ̈ⲁⲃⲏⲗ̅ ⲛⲉⲧⲉ‐ <text:line-break/><text:span text:style-name="T1"> </text:span><text:span text:style-name="T2">(17/9) </text:span> ⲛⲉⲣⲅⲉⲓ ⲇⲉ ⲕⲁⲧⲁ ⲙⲉⲣⲟⲥ ϩⲣⲁⲓ̈ ϩⲛ̅ ⲛ̅ⲙⲉⲗⲟⲥ <text:line-break/><text:span text:style-name="T1"> </text:span><text:span text:style-name="T2">(17/10) </text:span> ⲧⲁⲡⲉ ⲙⲉⲛ ⲇⲓ̅ⲟ̅ⲗ̅ⲓ̅ⲙ̅ⲟ̅ⲇ̅ⲣ̅ⲁ̅ⲍ̅ⲁ̅ ⲡⲙⲟⲩⲧ ⲓ̅ⲁⲙ̅‐ <text:line-break/><text:span text:style-name="T1"> </text:span><text:span text:style-name="T2">(17/11) </text:span> ⲙ̅ⲉ̅ⲁ̅ⲝ̅ ⲧⲛⲁϩⲃⲉ ⲛ̅ⲟⲩⲛⲁⲙ ⲓ̅̈ⲁⲕⲟⲩⲓ̈ⲃ̅ ⲧⲛⲁϩ‐ <text:line-break/><text:span text:style-name="T1"> </text:span><text:span text:style-name="T2">(17/12) </text:span> ⲃⲉ ⲛ̅ϭⲃⲟⲩⲣ ⲟⲩ̅ⲉ̅ⲣ̅ⲧ̅ⲱ̅ⲛ̅ ⲧϭⲓϫ ⲛ̅ⲟⲩⲛⲁⲙ ⲟⲩ‐ <text:line-break/><text:span text:style-name="T1"> </text:span><text:span text:style-name="T2">(17/13) </text:span> ⲇⲓⲇⲓ ⲧϭⲃⲟⲩⲣ ⲁⲣⲃⲁⲟ ⲛ̅ⲧⲏⲃⲉ ⲛ̅ⲧϭⲓϫ ⲛ̅ⲟⲩ‐ <text:line-break/><text:span text:style-name="T1"> </text:span><text:span text:style-name="T2">(17/14) </text:span> ⲛⲁⲙ ⲗⲁ̅ⲙ̅ⲡ̅ⲛ̅ⲱ̅ ⲛ̅ⲧⲏⲃⲉ ⲛ̅→ⲧ←ϭⲓϫ ⲛ̅ϭⲃⲟⲩⲣ <text:line-break/><text:span text:style-name="T1"> </text:span><text:span text:style-name="T2">(17/15) </text:span> ⲗⲏ̅ⲉ̅ⲕ̅ⲁ̅ⲫ̅ⲁ̅ⲣ̅ ⲧϭⲓⲃⲉ ⲛ̅ⲟⲩⲛⲁⲙ ⲃⲁ̅ⲣⲃⲁⲣ̅ ⲧϭⲓ‐ <text:line-break/><text:span text:style-name="T1"> </text:span><text:span text:style-name="T2">(17/16) </text:span> ⲃⲉ ⲛ̅ϭⲃⲟⲩⲣ ⲓⲙ̅ⲁ̅ⲏ̅ ⲧⲙⲉⲥⲧϩⲏⲧ ⲡⲓ̅ⲥⲁⲛⲇⲣⲁ̅‐ <text:line-break/><text:span text:style-name="T1"> </text:span><text:span text:style-name="T2">(17/17) </text:span> ⲡⲧ̅ⲏ̅ⲥ̅ ⲡϫⲱ ⲛ̅ⲟⲩⲛⲁⲙ ⲕⲟ̅ⲁⲇⲏ̅ ⲡϫⲱ ⲛ̅ϭⲃⲟⲩⲣ <text:line-break/><text:span text:style-name="T1"> </text:span><text:span text:style-name="T2">(17/18) </text:span> ⲟⲇⲉ̅ⲱ̅ⲣ̅ ⲥⲡⲓⲣ ⲛ̅ⲟⲩⲛⲁⲙ ⲁⲥ̅ⲫⲓⲝⲓⲝ̅ ⲡⲥⲡⲓⲣ <text:line-break/><text:span text:style-name="T1"> </text:span><text:span text:style-name="T2">(17/19) </text:span> ⲛ̅ϭⲃⲟⲩⲣ ⲥⲩⲛⲟ̅ⲅ̅ⲭ̅ⲟ̅ⲩ̅ⲧ̅ⲁ̅ ⲧⲕⲟⲓⲗⲓⲁ ⲁⲣ̅ⲟⲩⲫ̅ <text:line-break/><text:span text:style-name="T1"> </text:span><text:span text:style-name="T2">(17/20) </text:span> ⲡⲉⲕⲟⲩⲛϥ ⲥⲁⲃⲁⲗⲱ ⲡⲙⲏⲣⲟⲥ ⲛ̅ⲟⲩⲛⲁⲙ <text:line-break/><text:span text:style-name="T1"> </text:span><text:span text:style-name="T2">(17/21) </text:span> ⲭⲁ̅ⲣ̅ⲭ̅ⲁ̅ⲣ̅ⲃ̅ ⲡⲙⲏⲣⲟⲥ ⲛ̅ϭⲃ̅ⲟⲩⲣ̅ ⲭⲑ̅ⲁⲱⲛ̅ <text:line-break/><text:span text:style-name="T1"> </text:span><text:span text:style-name="T2">(17/22) </text:span> ⲛ̅ⲁⲓⲇⲟⲓⲟⲛ ⲧⲏⲣⲟⲩ ⲃⲁ̅ⲑ̅ⲓ̅ⲛ̅ⲱ̅ⲑ̅ ⲡⲡⲉⲧ ⲛ̅‐ <text:line-break/><text:span text:style-name="T1"> </text:span><text:span text:style-name="T2">(17/23) </text:span> ⲟⲩⲛⲁⲙ ⲭⲟⲩⲝ ⲡⲡⲉⲧ ⲛ̅ϭⲃⲟⲩⲣ ⲭⲁ̅ⲣ̅ⲭ̅ⲁ̅ <text:line-break/><text:span text:style-name="T1"> </text:span><text:span text:style-name="T2">(17/24) </text:span> ⲧⲥⲏⲃⲉ ⲛ̅ⲟⲩⲛⲁⲙ ⲁⲣ̅ⲟ̅ⲏ̅ⲣ̅ ⲧⲥⲏⲃⲉ ⲛ̅ϭⲃⲟⲩⲣ <text:line-break/><text:span text:style-name="T1"> </text:span><text:span text:style-name="T2">(17/25) </text:span> ⲧⲱ̅ⲉ̅ⲭ̅ⲑ̅ⲁ̅ ⲧⲕⲗ̅ⲗⲉ ⲛ̅ⲟⲩⲛⲁⲙ’ ⲁⲱ̅ⲗ̅ ⲧⲕⲗ̅ⲗⲉ <text:line-break/><text:span text:style-name="T1"> </text:span><text:span text:style-name="T2">(17/26) </text:span> ⲛ̅ϭ̅ⲃⲟⲩⲣ ⲭⲁⲣ̅ⲁⲛⲏⲣ̅ ⲧⲟⲩⲣⲏⲧⲉ ⲛ̅ⲟⲩ ⲛⲁⲙ <text:line-break/><text:span text:style-name="T1"> </text:span><text:span text:style-name="T2">(17/27) </text:span> ⲃⲁ̅ⲥ̅ⲧ̅ⲁ̅ⲛ̅ ⲛⲉⲥⲧⲏⲏⲃⲉ ⲁⲣⲭ̅ⲉⲛⲧⲉⲭⲑⲁ̅ ⲧⲟⲩ‐ <text:line-break/><text:span text:style-name="T1"> </text:span><text:span text:style-name="T2">(17/28) </text:span> ⲣⲏⲧⲉ ⲛ̅ϭⲃⲟⲩⲣ ⲙⲁⲣ̅ⲉ̅ⲫ̅ⲛ̣̅̅ⲟ̅ⲩ̅ⲛ̅ⲑ̅ ⲛ̅ⲛⲉⲥⲧⲏ‐ <text:line-break/><text:span text:style-name="T1"> </text:span><text:span text:style-name="T2">(17/29) </text:span> ⲏⲃⲉ ⲁⲃⲣ̅ⲁ̅ⲛ̅ⲁ̅ ⲛⲉⲩ[ϭⲙ̅ϭⲟⲙ’] ⲉϩⲣⲁⲓ̈ ϩⲓϫⲛ̅ <text:line-break/><text:span text:style-name="T1"> </text:span><text:span text:style-name="T2">(17/30) </text:span> ⲛⲁⲓ̈ ⲧⲏⲣⲟⲩ ⲛ̅ϭⲓ ⲥⲁϣ̅ϥ̅ ⲍ ⲙ̅ⲓⲭⲁⲏⲗ̅ ⲟ̅ⲩⲣⲓⲏⲗ̅ <text:line-break/><text:span text:style-name="T1"> </text:span><text:span text:style-name="T2">(17/31) </text:span> ⲁⲥⲙⲉⲛⲉⲇⲁⲥ ⲥⲁⲫⲁⲥ̅ⲁ̅ⲧ̅ⲟ̅ⲏ̅ⲗ̅ ⲁⲁⲣ̅ⲙⲟⲩⲣⲓⲁⲙ̅ <text:line-break/><text:span text:style-name="T1"> </text:span><text:span text:style-name="T2">(17/32) </text:span> ⲣ̅ⲓ̅ⲭ̅ⲣ̅ⲁ̅ⲙ̅’ ⲁ̅ⲙⲓⲱⲣⲯ̅· ⲁⲩⲱ ⲛⲉⲧϩⲓϫⲛ̅ ⲛ̅ⲁⲓⲥⲑⲏ‐ <text:line-break/><text:span text:style-name="T1"> </text:span><text:span text:style-name="T2">(17/33) </text:span> ⲥⲓⲥ ⲁⲣⲭⲉⲛⲇⲉⲕⲁⲧⲁ· ⲁⲩⲱ ⲡⲉϩⲓϫⲛ̅ ⲧⲁⲛⲁⲗⲏⲙ‐ <text:line-break/><text:span text:style-name="T1"> </text:span><text:span text:style-name="T2">(17/34) </text:span> ⲯⲓⲥ ⲇⲉ̅ⲓ̅ⲑ̅ⲁ̅ⲣ̅ⲃ̅ⲁ̅ⲑ̅ⲁ̅ⲥ̅ ⲁⲩⲱ ⲡⲉⲧϩⲓϫⲛ̅ ⲧⲫⲁ̅ⲛ‐ <text:line-break/><text:span text:style-name="T1"> </text:span><text:span text:style-name="T2">(17/35) </text:span> ⲧⲁⲥⲓⲁ ⲟⲩⲙ̅ⲙ̅ⲁ̅ⲁ̅ ⲁⲩⲱ ⲡⲉⲧϩⲓϫ̅ⲛ̅ ⲡϫ̣[ⲱⲛ]ϥ <text:line-break/><text:span text:style-name="T1"> </text:span><text:span text:style-name="T2">(18/1) </text:span> ⲁⲁⲭ̅ⲓ̅ⲁ̅ⲣ̅ⲁ̅ⲙ̅ ⲁⲩⲱ ⲡⲉⲧϩⲓϫⲛ̅ ⲧϩⲟⲣⲙⲏ ⲧⲏⲣ̅ⲥ̅ <text:line-break/><text:span text:style-name="T1"> </text:span><text:span text:style-name="T2">(18/2) </text:span> ⲣⲓⲁ̅ⲣ̅ⲁ̅ⲙ̅ⲛ̅ⲁ̅ⲭ̅ⲱ̅ ⲧⲡⲏⲅⲏ ⲇⲉ ⲛ̅ⲛⲓⲇⲁⲓⲙⲱⲛ <text:line-break/><text:span text:style-name="T1"> </text:span><text:span text:style-name="T2">(18/3) </text:span> ⲛⲁⲓ̈ ⲉⲧϩⲛ̅ ⲡⲥⲱⲙⲁ ⲧⲏⲣϥ ⲥⲉⲧⲏϣ ⲉϥⲧⲟ‐ <text:line-break/><text:span text:style-name="T1"> </text:span><text:span text:style-name="T2">(18/4) </text:span> ⲟⲩ ⲟⲩϩⲙ̅ⲙⲉ ⲟⲩⲁⲣⲟϣ ⲟⲩϩⲟϭⲃⲉⲥ ⲟⲩ‐ <text:line-break/><text:span text:style-name="T1"> </text:span><text:span text:style-name="T2">(18/5) </text:span> ϣⲟⲟⲩⲉ ⲧⲟⲩⲙⲁⲁⲩ ⲇⲉ ⲧⲏⲣⲟⲩ ⲧⲉ ⲧϩⲩ‐ <text:line-break/><text:span text:style-name="T1"> </text:span><text:span text:style-name="T2">(18/6) </text:span> ⲗⲏ ⲡⲉⲧⲟ ⲇⲉ ⲛ̅ϫⲟⲉⲓⲥ ⲉϫⲙ̅ ⲡϩⲙⲟⲙ ⲫⲗ̅ⲟ̅‐ <text:line-break/><text:span text:style-name="T1"> </text:span><text:span text:style-name="T2">(18/7) </text:span> ⲝⲟ̅ⲫ̅ⲁ̅ ⲡⲉⲧⲟ ⲇⲉ ⲛ̅ϫⲟⲉⲓⲥ ⲉϫⲙ̅ ⲡⲁⲣⲟϣ <text:line-break/><text:span text:style-name="T1"> </text:span><text:span text:style-name="T2">(18/8) </text:span> ⲟ̅ⲣ̅ⲟ̅ⲟ̅ⲣ̅ⲣ̅ⲟ̅ⲑ̅ⲟ̅ⲥ̅ ⲡⲉⲧⲟ ⲇⲉ ⲛ̅ϫⲟⲉⲓⲥ ⲉϫⲙ̅ ⲡⲉ‐ <text:line-break/><text:span text:style-name="T1"> </text:span><text:span text:style-name="T2">(18/9) </text:span> ⲧϣⲟⲩⲱⲟⲩ ⲉⲣ̅ⲓ̅ⲙ̅ⲁ̅ⲭ̅ⲱ̅ ⲡⲉⲧⲟ ⲇⲉ ⲛ̅ϫⲟⲉⲓⲥ <text:line-break/><text:span text:style-name="T1"> </text:span><text:span text:style-name="T2">(18/10) </text:span> ⲁϫⲙ̅ ⲡⲱϭⲃⲉ ⲁⲑⲩ̅ⲣ̅ⲱ̅ ⲧⲙⲁⲁⲩ ⲇⲉ ⲛ̅ⲛⲁⲓ̈ ⲧⲏ‐ <text:line-break/><text:soft-page-break/><text:span text:style-name="T1"> </text:span><text:span text:style-name="T2">(18/11) </text:span> ⲣⲟⲩ ⲥⲁϩⲉ ⲉⲣⲁⲧ̅ⲥ̅ ⲛ̅ⲧⲟⲩⲙⲏⲧⲉ ⲟⲛ̅ⲟⲣⲑⲟⲭⲣⲁ̅ <text:line-break/><text:span text:style-name="T1"> </text:span><text:span text:style-name="T2">(18/12) </text:span> ⲥⲁ̅ⲉ̅ⲓ̅ ⲉⲥϣⲟⲟⲡ’ ⲛ̅ⲁⲧⲧⲟϣ̅ⲥ̅ ⲁⲩⲱ ⲥⲧⲏϩ <text:line-break/><text:span text:style-name="T1"> </text:span><text:span text:style-name="T2">(18/13) </text:span> ⲛⲙ̅ⲙⲁⲩ ⲧⲏⲣⲟⲩ· ⲁⲩⲱ ⲧⲁⲓ̈ ⲛⲁⲙⲉ ⲧⲉ ⲧϩⲩⲗⲏ <text:line-break/><text:span text:style-name="T1"> </text:span><text:span text:style-name="T2">(18/14) </text:span> ⲉⲩⲥⲁⲛⲁϣⲧ ⲅⲁⲣ ⲉⲃⲟⲗ ϩⲓⲧⲟⲟⲧⲥ̅ ⲡϥⲧⲟⲟⲩ <text:line-break/><text:span text:style-name="T1"> </text:span><text:span text:style-name="T2">(18/15) </text:span> ⲛ̅ⲁⲣⲭⲏⲅⲟⲥ ⲛ̅ⲇⲁⲓⲙⲱⲛ ⲉⲫⲉ̅ⲙ̅ⲉ̅ⲙ̅ⲫ̅ⲓ̅ ⲡⲉ <text:line-break/><text:span text:style-name="T1"> </text:span><text:span text:style-name="T2">(18/16) </text:span> ⲡⲁ ⲧϩⲏⲇⲟⲛⲏ ⲓ̅̈̅ⲱ̅ⲕ̅ⲱ̅ ⲡⲉ ⲡⲁⲧ’ ⲉⲡⲓⲑⲩⲙⲉⲓⲁ <text:line-break/><text:span text:style-name="T1"> </text:span><text:span text:style-name="T2">(18/17) </text:span> ⲛⲉⲛⲉⲛⲧⲱⲫⲛⲓ ⲡⲉ ⲡⲁⲧⲗⲩⲡⲏ ⲃⲗ̅ⲁ̅ⲟ̅ⲙ̅ⲏ̅ⲛ̅ <text:line-break/><text:span text:style-name="T1"> </text:span><text:span text:style-name="T2">(18/18) </text:span> ⲡⲉ ⲡⲁⲧϩⲛⲱϩⲉ ⲧⲟⲩⲙⲁⲁⲩ ⲇⲉ ⲧⲏⲣⲟⲩ ⲉⲥ̅ⲑ̅ⲏ̅ⲛ̅ <text:line-break/><text:span text:style-name="T1"> </text:span><text:span text:style-name="T2">(18/19) </text:span> ⲥ̅ⲓ̅ⲥ̅ⲟ̅ⲩ̅ⲭ̅ ⲉⲡ̅ⲓⲡⲧⲟⲏ̅ ⲉⲃⲟⲗ ⲇⲉ ϩⲛ̅ ⲡⲓϥⲧⲟⲟⲩ <text:line-break/><text:span text:style-name="T1"> </text:span><text:span text:style-name="T2">(18/20) </text:span> ⲛ̅ⲇⲁⲓⲙⲱⲛ ⲁⲩϣⲱⲡⲉ ⲛ̅ϭⲓ ϩⲛ̅ⲡⲁⲑⲟⲥ ⲉ‐ <text:line-break/><text:span text:style-name="T1"> </text:span><text:span text:style-name="T2">(18/21) </text:span> ⲃⲟⲗ ⲇⲉ ϩⲛ̅ ⲧⲗⲩⲡⲏ ⲟⲩⲫⲑⲟⲛⲟⲥ ⲟⲩⲕⲱϩ <text:line-break/><text:span text:style-name="T1"> </text:span><text:span text:style-name="T2">(18/22) </text:span> ⲟⲩⲙ̅ⲕⲁϩ ⲟⲩⲟⲭⲗⲏⲥⲓⲥ ⲟⲩⲛⲓⲕⲉ ⲟⲩⲙⲛ̅ⲧ̅‐ <text:line-break/><text:span text:style-name="T1"> </text:span><text:span text:style-name="T2">(18/23) </text:span> ⲁⲧⲣ̅ϩⲧⲏϥ ⲟⲩⲣⲟⲟⲩϣ ⲟⲩϩⲏⲃⲉ ⲁⲩⲱ ⲡⲕⲉ‐ <text:line-break/><text:span text:style-name="T1"> </text:span><text:span text:style-name="T2">(18/24) </text:span> ϣⲱϫⲡ ⲉⲃⲟⲗ ⲇⲉ ϩⲛ̅ ⲧϩⲏⲇⲟⲛⲏ ϣⲁⲩ‐ <text:line-break/><text:span text:style-name="T1"> </text:span><text:span text:style-name="T2">(18/25) </text:span> ϣⲱⲡⲉ ⲛ̅ϭⲓ ϩⲁϩ ⲛ̅ⲕⲁⲕⲓⲁ ⲁⲩⲱ ⲡϣⲟⲩϣⲟⲩ‐ <text:line-break/><text:span text:style-name="T1"> </text:span><text:span text:style-name="T2">(18/26) </text:span> ⲉⲧϣⲟⲩⲉⲓⲧ ⲁⲩⲱ ⲛⲉⲧ’ⲉⲓⲛⲉ ⲛ̅ⲛⲁⲓ̈ ⲉⲃⲟⲗ <text:line-break/><text:span text:style-name="T1"> </text:span><text:span text:style-name="T2">(18/27) </text:span> ⲇⲉ ϩⲛ̅ ⲧⲉⲡⲓⲑⲩ̣ⲙⲓⲁ ⲟⲩⲟⲣⲅⲏ ⲟⲩϭⲱⲛⲧ <text:line-break/><text:span text:style-name="T1"> </text:span><text:span text:style-name="T2">(18/28) </text:span> ⲙⲛ̅ ⲟⲩⲭⲟ[ⲗⲏ] ⲙ[ⲛ̅ ⲟ]ⲩⲉⲣⲱⲥ· ⲉϥⲥⲁϣⲉ <text:line-break/><text:span text:style-name="T1"> </text:span><text:span text:style-name="T2">(18/29) </text:span> ⲙⲛ̅ ⲟⲩⲙ̅ⲛ̅ⲧ̅ⲁ̣ⲧ̣ⲥⲉⲓ ⲁⲩⲱ ⲛⲉⲧⲉⲓⲛⲉ ⲛ̅ⲛⲁⲓ̈ <text:line-break/><text:span text:style-name="T1"> </text:span><text:span text:style-name="T2">(18/30) </text:span> ⲉⲃⲟⲗ ⲇⲉ ϩⲛ̅ ⲧⲛⲱϩⲉ ⲟⲩⲉⲕⲡⲗⲏⲝⲓⲥ ⲟⲩ‐ <text:line-break/><text:span text:style-name="T1"> </text:span><text:span text:style-name="T2">(18/31) </text:span> ⲕⲱⲣϣ ⲟⲩⲁⲅⲱⲛⲓⲁ ⲟⲩϣⲓⲡⲉ ⲛⲁⲓ̈ ⲇⲉ ⲧⲏ‐ <text:line-break/><text:span text:style-name="T1"> </text:span><text:span text:style-name="T2">(18/32) </text:span> ⲣⲟⲩ ⲛ̅ⲑⲉ ⲛ̅ϩⲛ̅ⲡⲉⲧⲣ̅ϣⲁⲩ ⲙⲛ̅ ⲛ̅ⲡⲉⲑⲟ‐ <text:line-break/><text:span text:style-name="T1"> </text:span><text:span text:style-name="T2">(18/33) </text:span> ⲟⲩ ⲧⲉⲛⲛⲟⲓⲁ ⲇⲉ ⲛ̅ⲧⲉ ⲧⲟⲩⲙⲏⲉ ⲧⲉ ⲁⲛⲁ‐ <text:line-break/><text:span text:style-name="T1"> </text:span><text:span text:style-name="T2">(18/34) </text:span> ⲣ̣ⲱ̣ ⲉⲧⲉ ⲧⲁⲓ̈ ⲧⲉ ⲧⲁⲡⲉ ⲛ̅ⲧϩⲩⲗⲓⲕⲏ ⲛ̅ⲯⲩ‐ <text:line-break/><text:span text:style-name="T1"> </text:span><text:span text:style-name="T2">(18/35) </text:span> ⲭⲏ <text:line-break/><text:span text:style-name="T1"> </text:span><text:span text:style-name="T2">(19/1) </text:span> ⲉⲥϣⲟⲟⲡ ⲅⲁⲣ ⲙⲛ̅ ⲧⲉⲥⲑⲏⲥⲓⲥ ⲍⲟⲩ̅ⲭ̅ⲉ̅ⲡ̅ⲓ̅‐ <text:line-break/><text:span text:style-name="T1"> </text:span><text:span text:style-name="T2">(19/2) </text:span> ⲡⲧ̅ⲟ̅ⲏ̅ ⲧⲁⲓ̈ ⲧⲉ ⲧⲏⲡⲉ ⲛ̅ⲛ̅ⲁⲅⲅⲉⲗⲟⲥ ⲉⲡⲓ <text:line-break/><text:span text:style-name="T1"> </text:span><text:span text:style-name="T2">(19/3) </text:span> ⲧⲟ ⲁⲩⲧⲟ ⲉⲩⲉⲓⲣⲉ ⲛ̅ϣⲙ̅ⲧϣⲉⲥⲉⲧⲏⲉ ⲁⲩ‐ <text:line-break/><text:span text:style-name="T1"> </text:span><text:span text:style-name="T2">(19/4) </text:span> ⲣ̅ϩⲱⲃ ⲧⲏⲣⲟⲩ ⲉⲣⲟϥ ϣⲁⲛⲧϥϫⲱⲕ ⲉⲃⲟⲗ <text:line-break/><text:span text:style-name="T1"> </text:span><text:span text:style-name="T2">(19/5) </text:span> ϩⲓⲧⲟⲟⲧⲟⲩ ⲕⲁⲧⲁ ⲙⲉⲗⲟⲥ ⲛ̅ϭⲓ ⲯⲩⲭⲓⲕⲟⲛ <text:line-break/><text:span text:style-name="T1"> </text:span><text:span text:style-name="T2">(19/6) </text:span> ⲁⲩⲱ ⲡϩⲩⲗⲓⲕⲟⲛ ⲛ̅ⲥⲱⲙⲁ ⲥⲉϣⲟⲟⲡ ⲅⲁⲣ <text:line-break/><text:span text:style-name="T1"> </text:span><text:span text:style-name="T2">(19/7) </text:span> ⲛ̅ϭⲓ ϩⲉⲛⲕⲟⲟⲩⲉ ϩⲓϫⲛ̅ ⲡⲕⲉϣⲱϫⲡ ⲙ̅ⲡⲁ‐ <text:line-break/><text:span text:style-name="T1"> </text:span><text:span text:style-name="T2">(19/8) </text:span> ⲑⲟⲥ ⲛⲁⲓ̈ ⲉⲧⲉ ⲙ̅ⲡⲓϫⲟⲟⲩ ⲛⲁⲕ ⲉϣⲡⲉ ⲕⲟⲩ‐ <text:line-break/><text:span text:style-name="T1"> </text:span><text:span text:style-name="T2">(19/9) </text:span> ⲱϣⲉ ⲇⲉ ⲁⲙ̅ⲙⲉ ⲉⲣⲟⲟⲩ ϥⲥⲏϩ ϩⲣⲁⲓ̈ ϩⲙ̅ <text:line-break/><text:span text:style-name="T1"> </text:span><text:span text:style-name="T2">(19/10) </text:span> ⲡϫⲱⲱⲙⲉ ⲛ̅ⲍⲱⲣⲟⲁⲥⲧⲣⲟⲥ ⲁⲩⲣ̅ ϩⲱⲃ <text:line-break/><text:span text:style-name="T1"> </text:span><text:span text:style-name="T2">(19/11) </text:span> ⲇⲉ ⲧⲏⲣⲟⲩ ⲛ̅ϭⲓ ⲛⲓⲁⲅⲅⲉⲗⲟⲥ ⲙⲛ̅ ⲛ̅ⲇⲁⲓⲙⲱⲛ <text:line-break/><text:span text:style-name="T1"> </text:span><text:span text:style-name="T2">(19/12) </text:span> ϣⲁⲛⲧⲟⲩⲧⲥⲉⲛⲟ ⲙ̅ⲯⲩⲭⲓⲕⲟⲛ ⲛ̅ⲥⲱⲙⲁ <text:line-break/><text:span text:style-name="T1"> </text:span><text:span text:style-name="T2">(19/13) </text:span> ⲁⲩⲱ ⲁϥϣⲱⲡⲉ ⲧⲏⲣϥ ⲛ̅ϭⲓ ⲡⲟⲩϩⲱϥ ⲛ̅‐ <text:line-break/><text:span text:style-name="T1"> </text:span><text:span text:style-name="T2">(19/14) </text:span> ⲁⲣⲅⲟⲛ ⲁⲩⲱ ⲛ̅ⲁⲧⲕⲓⲙ ϩⲛ̅ ⲟⲩⲛⲟϭ ⲛ̅ⲟⲩ‐ <text:line-break/><text:span text:style-name="T1"> </text:span><text:span text:style-name="T2">(19/15) </text:span> ⲟⲉⲓϣ ⲧⲙⲁⲩ ⲇⲉ ⲛ̅ⲧⲁⲣⲉⲥⲟⲩⲱϣⲉ ⲁϫⲓ <text:line-break/><text:span text:style-name="T1"> </text:span><text:span text:style-name="T2">(19/16) </text:span> ⲛ̅ⲧϭⲟⲙ ⲉⲛⲧⲁⲥⲧⲁⲁⲥ ⲙ̅ⲡⲓϣⲟⲣⲡ ⲛ̅ⲁⲣ‐ <text:line-break/><text:span text:style-name="T1"> </text:span><text:span text:style-name="T2">(19/17) </text:span> ⲭⲱⲛ’ ⲁⲥⲥⲟⲡⲥ̅ ⲙ̅ⲡⲙⲏⲧⲣⲟⲡⲁⲧⲱⲣ ⲙ̅‐ <text:line-break/><text:span text:style-name="T1"> </text:span><text:span text:style-name="T2">(19/18) </text:span> ⲡⲧⲏⲣϥ ⲡⲁⲡⲛⲟϭ ⲛ̅ⲛⲁⲉ ⲁϥⲧⲛ̅ⲛⲟⲟⲩ ⲛ̅‐ <text:line-break/><text:span text:style-name="T1"> </text:span><text:span text:style-name="T2">(19/19) </text:span> ϯⲟⲩ ⲙ̅ⲫⲱⲥⲧⲏⲣ ϩⲙ̅ ⲡϣⲟϫⲛⲉ ⲉⲧⲟⲩⲁⲁⲃ <text:line-break/><text:span text:style-name="T1"> </text:span><text:span text:style-name="T2">(19/20) </text:span> ⲉϩⲣⲁⲓ̈ ⲉϫⲙ̅ ⲡⲧⲟⲡⲟⲥ ⲛ̅ⲛ̅ⲁⲅⲅⲉⲗⲟⲥ ⲙ̅ⲡⲣⲱ‐ <text:line-break/><text:span text:style-name="T1"> </text:span><text:span text:style-name="T2">(19/21) </text:span> ⲧⲁⲣⲭⲱⲛ ⲁⲩϫⲓ ϣⲟϫⲛⲉ ⲛⲁϥ ϩⲱⲥⲧⲉ ⲁⲧⲟⲩ <text:line-break/><text:span text:style-name="T1"> </text:span><text:span text:style-name="T2">(19/22) </text:span> ⲉⲓⲛⲉ ⲉⲃⲟⲗ ⲛ̅ⲧϭⲟⲙ ⲛ̅ⲧⲙⲁⲁⲩ ⲁⲩⲱ ⲡⲉϫⲁⲩ <text:line-break/><text:soft-page-break/><text:span text:style-name="T1"> </text:span><text:span text:style-name="T2">(19/23) </text:span> ⲛ̅ⲓⲁⲗⲧⲁⲃⲁⲱⲑ ϫⲉ ⲛⲓϥⲉ ⲉϩⲟⲩⲛ ϩⲙ̅ ⲡⲉϥ‐ <text:line-break/><text:span text:style-name="T1"> </text:span><text:span text:style-name="T2">(19/24) </text:span> ϩⲟ ⲉⲃⲟⲗ ϩⲓⲧⲛ̅ ⲡⲉⲕⲡ̅ⲛ̅ⲁ̅ ⲁⲩⲱ ϥⲛⲁⲧⲱ‐ <text:line-break/><text:span text:style-name="T1"> </text:span><text:span text:style-name="T2">(19/25) </text:span> ⲱⲛ ⲛ̅ϭⲓ ⲡⲉϥⲥⲱⲙⲁ ⲁⲩⲱ ⲁϥⲛⲓϥⲉ ⲉϩⲟⲩⲛ <text:line-break/><text:span text:style-name="T1"> </text:span><text:span text:style-name="T2">(19/26) </text:span> ⲉϩⲣⲁϥ ⲙ̅ⲡⲉϥⲡ̅ⲛ̅ⲁ̅ ⲉⲧⲉ ⲧⲁⲓ̈ ⲧⲉ ⲧϭⲟⲙ <text:line-break/><text:span text:style-name="T1"> </text:span><text:span text:style-name="T2">(19/27) </text:span> ⲛ̅ⲧⲉϥⲙⲁⲁⲩ ⲙ̅ⲡⲉϥⲙ̅ⲙⲉ ϫⲉ ϥϣⲟⲟⲡ <text:line-break/><text:span text:style-name="T1"> </text:span><text:span text:style-name="T2">(19/28) </text:span> ϩⲛ̅ ⲟⲩⲙ̅ⲛ̅ⲧ̅ⲁⲧⲥⲟⲟⲩⲛ ⲁ̣ⲩⲱ̣ ⲁⲥⲃⲱⲕ ⲉϩⲟⲩⲛ <text:line-break/><text:span text:style-name="T1"> </text:span><text:span text:style-name="T2">(19/29) </text:span> ⲛ̅ϭⲓ ⲧⲇⲩⲛⲁⲙⲓⲥ ⲛ̅ⲧⲙⲁⲁ̣ⲩ̣ ⲉⲃⲟⲗ ϩⲓⲧⲛ̅ ⲁⲗ‐ <text:line-break/><text:span text:style-name="T1"> </text:span><text:span text:style-name="T2">(19/30) </text:span> ⲧⲁⲃⲁⲱⲑ’ ⲉϩⲟⲩⲛ ⲁⲯⲩⲭⲓⲕⲟⲥ ⲛ̅ⲥⲱⲙⲁ <text:line-break/><text:span text:style-name="T1"> </text:span><text:span text:style-name="T2">(19/31) </text:span> ⲡⲉⲧⲁⲩⲣ̅ϩⲱⲃ ⲉⲣⲟϥ ⲕⲁⲧⲁ ⲡⲉⲓⲛⲉ ⲙ̅ⲡⲉⲧ‐ <text:line-break/><text:span text:style-name="T1"> </text:span><text:span text:style-name="T2">(19/32) </text:span> ϣⲟⲟⲡ’ ϫⲛ̅ ⲛ̅ϣⲟⲣⲡ ⲁϥⲕⲓⲙ ⲁⲩⲱ ⲁϥϭⲙ̅‐ <text:line-break/><text:span text:style-name="T1"> </text:span><text:span text:style-name="T2">(19/33) </text:span> ϭⲟⲙ ⲛ̅ϭⲓ ⲡⲥⲱⲙⲁ ⲁⲩⲱ ⲁϥⲣ̅ ⲟⲩⲟⲉⲓⲛ <text:line-break/><text:span text:style-name="T1"> </text:span><text:span text:style-name="T2">(19/34) </text:span> ⲁⲩⲱ ⲁⲩⲕⲱϩ ϩⲛ̅ ⲧⲟⲩⲛⲟⲩ ⲉⲧⲙ̅ⲙⲁⲩ ⲛ̅ϭⲓ <text:line-break/><text:span text:style-name="T1"> </text:span><text:span text:style-name="T2">(20/1) </text:span> ⲡⲕⲉⲥⲉⲉⲡⲉ ⲛ̅ⲇⲩⲛⲁⲙⲓⲥ ϫⲉ ⲛ̅ⲧⲁϥϣⲱⲡⲉ <text:line-break/><text:span text:style-name="T1"> </text:span><text:span text:style-name="T2">(20/2) </text:span> ⲅⲁⲣ ⲉⲃⲟⲗ ϩⲓⲧⲟⲟⲧⲟⲩ ⲧⲏⲣⲟⲩ ⲁⲩⲱ ⲁⲩϯ ⲛ̅ⲧⲉⲩ <text:line-break/><text:span text:style-name="T1"> </text:span><text:span text:style-name="T2">(20/3) </text:span> ϭⲁⲙ ⲙ̅ⲡⲣⲱⲙⲉ ⲁⲩⲱ ⲁⲥⲧⲁϫⲣⲟ ⲛ̅ϭⲓ ⲧⲉϥⲙ̅ⲛ̅ⲧ̅‐ <text:line-break/><text:span text:style-name="T1"> </text:span><text:span text:style-name="T2">(20/4) </text:span> ⲣⲙⲛ̅ϩⲏⲧ ⲛ̅ϩⲟⲩⲟ ⲁⲛⲉⲧⲁϩⲧⲁⲙⲓⲟϥ ⲁⲩⲱ ⲛ̅‐ <text:line-break/><text:span text:style-name="T1"> </text:span><text:span text:style-name="T2">(20/5) </text:span> ϩⲟⲩⲟ ⲁⲡϣⲟⲣⲡ ⲛ̅ⲁⲣⲭⲱⲛ ⲛ̅ⲧⲁⲣⲟⲩⲙ̅ⲙⲉ ⲇⲉ <text:line-break/><text:span text:style-name="T1"> </text:span><text:span text:style-name="T2">(20/6) </text:span> ϫⲉ ϥⲟ ⲛ̅ⲟⲩⲟⲉⲓⲛ ⲁⲩⲱ ϥⲙⲉⲉⲩⲉ ⲛ̅ϩⲟⲩⲟ <text:line-break/><text:span text:style-name="T1"> </text:span><text:span text:style-name="T2">(20/7) </text:span> ⲉⲣⲟⲟⲩ ⲁⲩⲱ ϥⲕⲏⲕ ⲁϩⲏⲩ ⲛ̅ⲧⲕⲁⲕⲓⲁ ⲁⲩϥⲓ ⲙ̅‐ <text:line-break/><text:span text:style-name="T1"> </text:span><text:span text:style-name="T2">(20/8) </text:span> ⲙⲟϥ ⲁⲩⲛⲟϫϥ ⲁⲡⲙⲉⲣⲟⲥ ⲉⲧⲙ̅ⲡⲥⲁⲙ’ ⲡⲓⲧⲛ̅ <text:line-break/><text:span text:style-name="T1"> </text:span><text:span text:style-name="T2">(20/9) </text:span> ⲛ̅ⲧϩⲩⲗⲏ ⲧⲏⲣ̅ⲥ̅ ⲡⲙⲁⲕⲁⲣⲓⲟⲥ ⲇⲉ ⲡⲙⲏⲧⲣⲟⲡⲁ‐ <text:line-break/><text:span text:style-name="T1"> </text:span><text:span text:style-name="T2">(20/10) </text:span> ⲧⲱⲣ’ ⲡⲣⲉϥⲣ̅ⲡⲉⲧⲛⲁⲛⲟⲩϥ ⲁⲩⲱ ⲡϣⲁⲛϩⲧⲏϥ <text:line-break/><text:span text:style-name="T1"> </text:span><text:span text:style-name="T2">(20/11) </text:span> ⲁϥϣⲛ̅ϩⲧⲏϥ ⲉϩⲣⲁⲓ̈ ⲁϫⲛ̅ ⲧⲇⲩⲛⲁⲙⲓⲥ ⲛ̅ⲧⲙⲁ‐ <text:line-break/><text:span text:style-name="T1"> </text:span><text:span text:style-name="T2">(20/12) </text:span> ⲁⲩ ⲧⲁⲓ̈ ⲉⲧⲁⲩⲛ̅ⲧⲥ̅ ⲉⲃⲟⲗ ϩⲓⲧⲙ̅ ⲡⲣⲱⲧⲁⲣⲭⲱⲛ <text:line-break/><text:span text:style-name="T1"> </text:span><text:span text:style-name="T2">(20/13) </text:span> ⲁⲩⲱ ⲟⲛ ϫⲉ ⲥⲉⲛⲁϭⲙ̅ϭⲟⲙ ⲉϩⲣⲁⲓ̈ ⲉϫⲙ̅ ⲡⲥⲱ‐ <text:line-break/><text:span text:style-name="T1"> </text:span><text:span text:style-name="T2">(20/14) </text:span> ⲙⲁ ⲙ̅ⲯⲩⲭⲓⲕⲟⲛ ⲁⲩⲱ ⲡⲉⲥⲑⲏⲧⲟⲛ ⲁⲩⲱ ⲁϥ‐ <text:line-break/><text:span text:style-name="T1"> </text:span><text:span text:style-name="T2">(20/15) </text:span> ⲧⲛ̅ⲛⲟⲟⲩ ⲉⲃⲟⲗ ϩⲓⲧⲛ̅ ⲡⲉϥⲡ̅ⲛ̅ⲁ̅ ⲛ̅ⲣⲉϥⲣ̅ ⲡ̅ⲉ‐ <text:line-break/><text:span text:style-name="T1"> </text:span><text:span text:style-name="T2">(20/16) </text:span> ⲧⲛⲁⲛⲟⲩϥ ⲁⲩⲱ ⲡⲉⲧⲛⲁϣⲉ ⲡⲉϥⲛⲁ ⲛ̅ⲟⲩ‐ <text:line-break/><text:span text:style-name="T1"> </text:span><text:span text:style-name="T2">(20/17) </text:span> ⲃⲟⲏⲑⲟⲥ ⲛ̅ⲁⲇⲁⲙ ⲟⲩⲉⲡⲓⲛⲟⲓⲁ ⲛ̅ⲟⲩⲟⲉⲓⲛ <text:line-break/><text:span text:style-name="T1"> </text:span><text:span text:style-name="T2">(20/18) </text:span> ⲧⲁⲓ̈ ⲟⲩ ⲉⲃⲟⲗ ⲛ̅ϩⲏⲧϥ ⲧⲉ ⲉⲁⲩⲙⲟⲩⲧⲉ ⲉⲣⲟⲥ <text:line-break/><text:span text:style-name="T1"> </text:span><text:span text:style-name="T2">(20/19) </text:span> ϫⲉ ⲍⲱⲏ ⲧⲁⲓ̈ ⲇⲉ ⲉⲥⲣ̅ϩⲩⲡⲟⲩⲣⲅⲉⲓ ⲛ̅ⲧⲕⲧⲓⲥⲓⲥ <text:line-break/><text:span text:style-name="T1"> </text:span><text:span text:style-name="T2">(20/20) </text:span> ⲧⲏⲣⲥ ⲉⲥϣⲉⲡ ϩⲓⲥⲉ ⲛⲙ̅ⲙⲁϥ ⲁⲩⲱ ⲉⲥⲥⲱϩⲉ <text:line-break/><text:span text:style-name="T1"> </text:span><text:span text:style-name="T2">(20/21) </text:span> ⲙ̅ⲙⲁϥ ⲉϩⲟⲩⲛ ⲁⲡⲉϥⲡⲗⲏⲣⲱⲙⲁ ⲁⲩⲱ ⲉⲥ‐ <text:line-break/><text:span text:style-name="T1"> </text:span><text:span text:style-name="T2">(20/22) </text:span> ⲧⲥⲉⲃⲟ ⲙ̅ⲙⲁϥ ⲁⲧⲉϥϭⲓⲛⲉⲓ ⲁⲡⲓⲧⲛ̅ ⲙ̅ⲡⲥ‐ <text:line-break/><text:span text:style-name="T1"> </text:span><text:span text:style-name="T2">(20/23) </text:span> ⲡⲉⲣⲙⲁ ⲉⲥⲧⲥⲁⲃⲟ ⲙ̅ⲙⲟϥ ⲉⲡⲙⲁⲓ̈ⲧ ⲃ̅ⲃⲱⲕ <text:line-break/><text:span text:style-name="T1"> </text:span><text:span text:style-name="T2">(20/24) </text:span> ⲉϩⲣⲁⲓ̈ ⲡⲙⲁⲓ̈ⲧ’ ⲉⲛⲧⲁϥⲉⲓ ⲉϩⲣⲁⲓ̈ ⲙ̅ⲙⲁⲩ ⲁⲩ‐ <text:line-break/><text:span text:style-name="T1"> </text:span><text:span text:style-name="T2">(20/25) </text:span> ⲱ ⲧⲉⲡⲓⲛⲟⲓⲁ ⲙ̅ⲡⲟⲩⲟⲉⲓⲛ ⲉⲥϩⲏⲡ ϩⲛ̅ ⲁ‐ <text:line-break/><text:span text:style-name="T1"> </text:span><text:span text:style-name="T2">(20/26) </text:span> ⲇⲁⲙ ϫⲉⲕⲁⲁⲥ ⲛ̅ⲛⲟⲩⲙ̅ⲙⲉ ⲛ̅ϭⲓ ⲛ̅ⲁⲣⲭⲱⲛ <text:line-break/><text:span text:style-name="T1"> </text:span><text:span text:style-name="T2">(20/27) </text:span> ⲁⲗⲗⲁ ⲛ̅ⲥϣⲱⲡⲉ ⲛ̅ϭⲓ ⲧⲉⲡⲓⲛⲟⲓⲁ ⲛ̅ⲟⲩⲥⲱ‐ <text:line-break/><text:span text:style-name="T1"> </text:span><text:span text:style-name="T2">(20/28) </text:span> ϩⲉ ⲙ̅ⲡϣⲧⲁ ⲛ̅ⲧⲙⲁⲁⲩ ⲁⲩⲱ ⲁϥⲟⲩⲱⲛϩ ⲉⲃⲟⲗ <text:line-break/><text:span text:style-name="T1"> </text:span><text:span text:style-name="T2">(20/29) </text:span> ⲛ̅ϭⲓ ⲡⲣⲱⲙⲉ ⲉⲧⲃⲉ ⲧϩⲁⲓ̈ⲃⲉⲥ ⲙ̅ⲡⲟⲩⲟⲉⲓⲛ <text:line-break/><text:span text:style-name="T1"> </text:span><text:span text:style-name="T2">(20/30) </text:span> ⲧⲁⲓ̈ ⲉⲧϣⲟⲟⲡ ϩⲣⲁⲓ̈ ⲛ̅ϩⲏⲧϥ ⲁⲩⲱ ⲁⲡⲉϥⲙⲉ‐ <text:line-break/><text:span text:style-name="T1"> </text:span><text:span text:style-name="T2">(20/31) </text:span> ⲉⲩⲉ ϫⲓⲥⲉ ⲡⲁⲣⲁ ⲛⲉⲧⲁϩⲧⲁⲙⲓⲟϥ ⲧⲏⲣⲟⲩ <text:line-break/><text:span text:style-name="T1"> </text:span><text:span text:style-name="T2">(20/32) </text:span> ⲛ̅ⲧⲁⲣⲟⲩⲉⲓⲱⲣⲙⲉ ⲁⲧⲡⲉ ⲁⲩⲛⲁⲩ ⲉⲣⲟϥ <text:line-break/><text:span text:style-name="T1"> </text:span><text:span text:style-name="T2">(20/33) </text:span> ϫⲉ ϥϫⲟⲥⲉ ⲛ̅ϭⲓ ⲡⲉϥⲙⲉⲉⲩⲉ ⲁⲩⲱ ⲁⲩⲉⲓⲣⲉ <text:line-break/><text:span text:style-name="T1"> </text:span><text:span text:style-name="T2">(20/34) </text:span> ⲛ̅ⲟⲩϣⲟϫⲛⲉ ⲙⲛ̅ ⲧⲁⲣⲭⲟⲛⲧⲓⲕⲏ ⲙⲛ̅ ⲧⲁⲅ‐ <text:line-break/><text:span text:style-name="T1"> </text:span><text:span text:style-name="T2">(20/35) </text:span> ⲅⲉⲗⲓⲕⲏ ⲧⲏⲣⲥ̅ ⲁⲩϥⲓ ⲛ̅ⲟⲩⲥⲁⲧⲉ ⲙⲛ̅ ⲟⲩⲕⲁϩ <text:line-break/><text:soft-page-break/><text:span text:style-name="T1"> </text:span><text:span text:style-name="T2">(21/1) </text:span> ⲙⲛ̅ ⲟⲩⲙⲟⲟⲩ ⲁⲩⲧⲱ→ϩ← ⲙ̅ⲙⲟⲟⲩ ⲙⲛ̅ ⲛⲟⲩⲉⲣⲏⲩ <text:line-break/><text:span text:style-name="T1"> </text:span><text:span text:style-name="T2">(21/2) </text:span> ⲙⲛ̅ ⲡⲉϥⲧⲟⲩ ⲧⲏⲩ ⲛ̅ⲥⲁⲧⲉ ⲁⲩⲱ ⲁⲩϣⲱϭⲉ ⲉ‐ <text:line-break/><text:span text:style-name="T1"> </text:span><text:span text:style-name="T2">(21/3) </text:span> ϩⲟⲩⲛ ϩⲛ̅ ⲛⲟⲩⲉⲣⲏⲩ ⲁⲩⲱ ⲁⲩⲉⲓⲣⲉ ⲛ̅ⲟⲩⲛⲟϭ <text:line-break/><text:span text:style-name="T1"> </text:span><text:span text:style-name="T2">(21/4) </text:span> ⲛ̅ϣⲧⲟⲣⲧⲣ̅ ⲁⲩⲱ ⲁⲩⲱⲗ ⲙ̅ⲙⲟϥ ⲉϩⲟⲩⲛ ⲁⲧϩⲁⲓ̈‐ <text:line-break/><text:span text:style-name="T1"> </text:span><text:span text:style-name="T2">(21/5) </text:span> ⲃⲉⲥ ⲙ̅ⲡⲙⲟⲩ ϫⲉⲕⲁⲁⲥ ⲉⲩⲛⲁⲡⲗⲁⲥⲥⲉ ⲛ̅ⲕⲉ‐ <text:line-break/><text:span text:style-name="T1"> </text:span><text:span text:style-name="T2">(21/6) </text:span> ⲥⲟⲡ’ ⲉⲃⲟⲗ ϩⲙ̅ ⲡⲕⲁϩ ⲙⲛ̅ ⲡⲙⲟⲟⲩ ⲙⲛ̅ ⲧⲕⲱϩⲧ <text:line-break/><text:span text:style-name="T1"> </text:span><text:span text:style-name="T2">(21/7) </text:span> ⲁⲩⲱ ⲡⲉⲡ̅ⲛ̅ⲁ̅ ⲡⲉⲃⲟⲗ ϩⲛ̅ ⲧϩⲩⲗⲏ ⲉⲧⲉ ⲧⲁⲓ̈ ⲧⲉ <text:line-break/><text:span text:style-name="T1"> </text:span><text:span text:style-name="T2">(21/8) </text:span> ⲧⲙ̅ⲛ̅ⲧ̅ⲁⲧⲥⲟⲟⲩⲛ ⲙ̅ⲡⲕⲁⲕⲉ ⲁⲩⲱ ⲧⲉⲡⲓⲑⲩ‐ <text:line-break/><text:span text:style-name="T1"> </text:span><text:span text:style-name="T2">(21/9) </text:span> ⲙⲉⲓⲁ ⲁⲩⲱ ⲡⲉⲩⲡ̅ⲛ̅ⲁ̅ ⲉⲧϣⲃⲃⲓⲁⲉⲓⲧ ⲉⲧⲉ ⲡⲁⲓ̈ <text:line-break/><text:span text:style-name="T1"> </text:span><text:span text:style-name="T2">(21/10) </text:span> ⲡⲉ ⲡⲥⲡⲏⲗⲁⲓⲟⲛ ⲛ̅ⲧⲁⲛⲁⲡⲗⲁⲥⲓⲥ ⲙ̅ⲡⲥⲱⲙⲁ <text:line-break/><text:span text:style-name="T1"> </text:span><text:span text:style-name="T2">(21/11) </text:span> ⲡⲁⲓ̈ ⲉⲛⲧⲁⲩⲧⲁⲁϥ ϩⲓ ⲡⲣⲱⲙⲉ ⲛ̅ϭⲓ ⲛ̅ⲗⲏⲥⲧⲏⲥ <text:line-break/><text:span text:style-name="T1"> </text:span><text:span text:style-name="T2">(21/12) </text:span> ⲧⲙⲣ̅ⲣⲉ ⲛ̅ⲧⲃ̅ϣⲉ ⲁⲩⲱ ⲡⲁⲓ̈ ⲁϥϣⲱⲡⲉ ⲛ̅ⲟⲩ‐ <text:line-break/><text:span text:style-name="T1"> </text:span><text:span text:style-name="T2">(21/13) </text:span> ⲣⲱⲙⲉ ⲉϣⲁϥⲙⲟⲩ ⲡⲁⲓ̈ ⲡⲉⲛⲧⲁϩⲉⲓ ⲉϩⲣⲁⲓ̈ <text:line-break/><text:span text:style-name="T1"> </text:span><text:span text:style-name="T2">(21/14) </text:span> ⲛ̅ϣⲟⲣⲡ ⲁⲩⲱ ⲡϣⲟⲣⲡ ⲙ̅ⲡⲱⲣϫ’ ⲉⲃⲟⲗ ⲧⲉ‐ <text:line-break/><text:span text:style-name="T1"> </text:span><text:span text:style-name="T2">(21/15) </text:span> ⲡⲓⲛⲟⲓⲁ ⲇⲉ ⲙ̅ⲡⲟⲩⲟⲉⲓⲛ ⲉⲧⲛⲁⲥⲛ̅ϩⲏⲧϥ ⲛ̅‐ <text:line-break/><text:span text:style-name="T1"> </text:span><text:span text:style-name="T2">(21/16) </text:span> ⲧⲟⲥ ⲡⲉⲧⲛⲁⲥⲧⲟⲩⲛⲟⲩⲥ ⲙ̅ⲡⲉϥⲙⲉⲉⲩⲉ ⲁⲩ‐ <text:line-break/><text:span text:style-name="T1"> </text:span><text:span text:style-name="T2">(21/17) </text:span> ⲱ ⲁⲩⲉⲓⲛⲉ ⲙ̅ⲙⲟϥ ⲛ̅ϭⲓ ⲛⲁⲣⲭⲱⲛ ⲁⲩⲕⲱ ⲙ̅‐ <text:line-break/><text:span text:style-name="T1"> </text:span><text:span text:style-name="T2">(21/18) </text:span> ⲙⲟϥ ϩⲣⲁⲓ̈ ϩⲙ̅ ⲡⲁⲣⲁⲇⲓⲥⲟⲥ ⲁⲩⲱ ⲡⲉϫⲁⲩ ⲛⲁϥ <text:line-break/><text:span text:style-name="T1"> </text:span><text:span text:style-name="T2">(21/19) </text:span> ϫⲉ ⲟⲩⲱⲙ ⲉⲧⲉ ⲡⲁⲓ̈ ⲡⲉ ϩⲛ̅ ⲟⲩⲥⲣ̅ϥⲉ ⲕⲁⲓ ⲅⲁⲣ <text:line-break/><text:span text:style-name="T1"> </text:span><text:span text:style-name="T2">(21/20) </text:span> ⲧⲟⲩⲧⲣⲩⲫⲏ ⲥⲁϣⲉ ⲁⲩⲱ ⲡⲟⲩⲥⲁⲉ ⲟⲩⲁⲛⲟ‐ <text:line-break/><text:span text:style-name="T1"> </text:span><text:span text:style-name="T2">(21/21) </text:span> ⲙⲟⲛ ⲡⲉ ⲧⲟⲩⲧⲣⲩⲫⲏ ⲇⲉ ⲧⲉ ⲧⲁⲡⲁⲧⲏ ⲁⲩⲱ <text:line-break/><text:span text:style-name="T1"> </text:span><text:span text:style-name="T2">(21/22) </text:span> ⲛⲟⲩϣⲏⲛ ⲧⲉ ⲧⲙⲛ̅ⲧ̅ⲁⲥⲉⲃⲏⲥ ⲁⲩⲱ ⲡⲟⲩⲕⲁⲣ‐ <text:line-break/><text:span text:style-name="T1"> </text:span><text:span text:style-name="T2">(21/23) </text:span> ⲡⲟⲥ ⲟⲩⲙⲁⲧⲟⲩ ⲛ̅ⲁⲧⲧⲁⲗϭⲟ ⲡⲉ ⲁⲩⲱ ⲡⲟⲩ‐ <text:line-break/><text:span text:style-name="T1"> </text:span><text:span text:style-name="T2">(21/24) </text:span> ϣⲡⲱⲡ ⲟⲩⲙⲟⲩ ⲡⲉ ⲡϣⲏⲛ ⲇⲉ ⲛ̅ⲧⲉ ⲡⲟⲩ‐ <text:line-break/><text:span text:style-name="T1"> </text:span><text:span text:style-name="T2">(21/25) </text:span> ⲱⲛϩ ⲉⲛⲧⲁⲩⲕⲱ ⲙ̅ⲙⲟϥ ϩⲛ̅ ⲧⲙⲏⲧⲉ ⲙ̅ⲡⲁ‐ <text:line-break/><text:span text:style-name="T1"> </text:span><text:span text:style-name="T2">(21/26) </text:span> ⲣⲁⲇⲓⲥⲟⲥ ⲁⲛⲟⲕ ⲇⲉ ϯⲛⲁⲧⲥⲁⲃⲱⲧⲛ̅ ϫⲉ <text:line-break/><text:span text:style-name="T1"> </text:span><text:span text:style-name="T2">(21/27) </text:span> ⲟⲩ ⲡⲉ ⲡⲙⲩⲥⲧⲏⲣⲓⲟⲛ ⲛ̅ⲧⲉ ⲡⲟⲩⲱⲛϩ ⲉⲧⲉ <text:line-break/><text:span text:style-name="T1"> </text:span><text:span text:style-name="T2">(21/28) </text:span> ⲡⲁⲓ̈ ⲡⲉ ⲡϣⲟϫⲛⲉ ⲉⲛⲧⲁⲩⲁⲁϥ ⲙⲛ̅ ⲛⲟⲩⲉ‐ <text:line-break/><text:span text:style-name="T1"> </text:span><text:span text:style-name="T2">(21/29) </text:span> ⲣⲏⲩ ⲉⲧⲉ ⲡⲁⲓ̈ ⲡⲉ ⲡⲉⲓⲛⲉ ⲙ̅ⲡⲟⲩⲡⲛ̅ⲁ̅ ⲡⲁⲓ̈ <text:line-break/><text:span text:style-name="T1"> </text:span><text:span text:style-name="T2">(21/30) </text:span> ⲉⲣⲉ ⲧⲉϥⲛⲟⲩⲛⲉ ⲥⲁϣⲉ ⲁⲩⲱ ⲛⲉϥⲕⲗⲁⲇⲟⲥ <text:line-break/><text:span text:style-name="T1"> </text:span><text:span text:style-name="T2">(21/31) </text:span> ϩⲉⲛⲙⲟⲩ ⲛⲉ ⲧⲉϥϩⲟⲓ̈ⲃⲉⲥ ⲟⲩⲙⲟⲥⲧⲉ ⲡⲉ <text:line-break/><text:span text:style-name="T1"> </text:span><text:span text:style-name="T2">(21/32) </text:span> ⲁⲩⲱ ⲟⲩⲁⲡⲁⲧⲏ ⲧⲉⲧϣⲟⲟⲡ ϩⲛ̅ ⲛⲉϥϭⲱ‐ <text:line-break/><text:span text:style-name="T1"> </text:span><text:span text:style-name="T2">(21/33) </text:span> ⲱⲃⲉ ⲁⲩⲱ ⲡⲉϥϯⲟⲩⲱ ⲡⲉ ⲡⲧⲱϩ̅ⲥ̅ ⲛ̅ⲧⲡⲟ <text:line-break/><text:span text:style-name="T1"> </text:span><text:span text:style-name="T2">(21/34) </text:span> ⲛⲏⲣⲓⲁ ⲁⲩⲱ ⲡⲉϥⲕⲁⲣⲡⲟⲥ ⲡⲉ ⲡⲙⲟⲩ ⲁⲩ‐ <text:line-break/><text:span text:style-name="T1"> </text:span><text:span text:style-name="T2">(21/35) </text:span> ⲱ ⲟⲩⲉⲡⲓⲑⲩⲙⲓⲁ ⲡⲉ ⲡⲉϥⲥⲡⲉⲣⲙⲁ ⲁⲩⲱ <text:line-break/><text:span text:style-name="T1"> </text:span><text:span text:style-name="T2">(21/36) </text:span> ⲉϥϯⲟⲩⲱ ⲉⲃⲟⲗ ϩⲙ̅ ⲡⲕⲁⲕⲉ ⲛⲉⲧϫⲓϯⲡⲉ <text:line-break/><text:span text:style-name="T1"> </text:span><text:span text:style-name="T2">(22/1) </text:span> ⲉⲃⲟⲗ ⲛ̅ϩⲏⲧϥ ⲡⲉⲩⲙⲁ ⲛ̅ϣⲱⲡⲉ ⲡⲉ ⲁ‐ <text:line-break/><text:span text:style-name="T1"> </text:span><text:span text:style-name="T2">(22/2) </text:span> ⲙⲛ̅ⲧⲉ ⲁⲩⲱ ⲡⲕⲁⲕⲉ ⲡⲉ ⲡⲟⲩⲙⲁ ⲛⲙ̅ⲧⲟⲛ <text:line-break/><text:span text:style-name="T1"> </text:span><text:span text:style-name="T2">(22/3) </text:span> ⲡⲉⲛⲧⲁⲩⲙⲟⲩⲧⲉ ⲇⲉ ⲉⲣⲟϥ ⲉⲃⲟⲗ ϩⲓⲧⲟⲟⲧⲟⲩ <text:line-break/><text:span text:style-name="T1"> </text:span><text:span text:style-name="T2">(22/4) </text:span> ϫⲉ ⲡϣⲏⲛ ⲛ̅ⲥⲟⲩⲛ̅ ⲡⲉⲧⲛⲁⲛⲟⲩϥ ⲙ̅ⲛ ⲡⲉⲧ‐ <text:line-break/><text:span text:style-name="T1"> </text:span><text:span text:style-name="T2">(22/5) </text:span> ϩⲟⲟⲩ ⲉⲧⲉ ⲡⲁⲓ̈ ⲡⲉ ⲧⲉⲡⲓⲛⲟⲓⲁ ⲙ̅ⲡⲟⲩⲟⲉⲓⲛ ⲉ‐ <text:line-break/><text:span text:style-name="T1"> </text:span><text:span text:style-name="T2">(22/6) </text:span> ⲁⲩϭⲱ ⲙ̅ⲡⲉϥⲙ̅ⲧⲟ ⲉⲃⲟⲗ ϫⲉⲕⲁⲁⲥ ⲛ̅ⲛⲉϥ <text:line-break/><text:span text:style-name="T1"> </text:span><text:span text:style-name="T2">(22/7) </text:span> ϭⲱϣⲧ ⲉϩⲣⲁⲓ̈ ⲁⲡϥⲡⲗⲏⲣⲱⲙⲁ ⲁⲩⲱ ⲁⲧⲣⲉϥ‐ <text:line-break/><text:span text:style-name="T1"> </text:span><text:span text:style-name="T2">(22/8) </text:span> ⲥⲟⲩⲱⲛ ⲡⲕⲱⲛⲕ ⲁϩⲏⲩ ⲛ̅ⲧⲉϥⲁⲥⲭⲏⲙⲟⲥⲩ‐ <text:line-break/><text:span text:style-name="T1"> </text:span><text:span text:style-name="T2">(22/9) </text:span> ⲛⲏ ⲁⲛⲟⲕ ⲇⲉ ⲁⲓ̈ⲥⲉϩⲱⲟⲩ ⲁⲧⲣⲟⲩⲱⲙ ⲁⲩⲱ <text:line-break/><text:span text:style-name="T1"> </text:span><text:span text:style-name="T2">(22/10) </text:span> ⲡⲉϫⲁⲉⲓ ⲙ̅ⲡⲥ̅ⲱ̅ⲣ̅ ϫⲉ ⲡϫⲟⲉⲓⲥ ⲙⲏ ⲫⲁϥ ⲁⲛ <text:line-break/><text:span text:style-name="T1"> </text:span><text:span text:style-name="T2">(22/11) </text:span> ⲡⲉⲛⲧⲁϥⲧⲥⲉⲃⲉ ⲁⲇⲁⲙ ⲁⲧⲣⲉϥⲟⲩⲱⲙ ⲁϥⲥⲱ‐ <text:line-break/><text:soft-page-break/><text:span text:style-name="T1"> </text:span><text:span text:style-name="T2">(22/12) </text:span> ⲃⲉ ⲛ̅ϭⲓ ⲡⲥ̅ⲱ̅ⲣ̅ ⲡⲉϫⲁϥ ϫⲉ ⲫⲟϥ ⲁϥⲧⲥⲉⲃⲟⲟⲩ <text:line-break/><text:span text:style-name="T1"> </text:span><text:span text:style-name="T2">(22/13) </text:span> ⲁⲟⲩⲱⲙ ⲉⲃⲟⲗ ϩⲛ̅ ⲟⲩⲕⲁⲕⲓⲁ ⲛ̅ⲥⲡⲟⲣⲁ ⲛ̅ⲉ‐ <text:line-break/><text:span text:style-name="T1"> </text:span><text:span text:style-name="T2">(22/14) </text:span> ⲡⲓⲑⲩⲙⲉⲓⲁ ⲛ̅ⲧⲉ ⲡⲧⲉⲕⲟ ϫⲉⲕⲁⲁⲥ ⲉϥⲛⲁϣⲱ‐ <text:line-break/><text:span text:style-name="T1"> </text:span><text:span text:style-name="T2">(22/15) </text:span> ⲡⲉ ⲛⲁϥ ⲛ̅ⲟⲩϣⲁⲩ ⲁⲩⲱ ⲁϥⲙ̅ⲙⲉ ϫⲉ ϥⲟ ⲛ̅ⲁⲧ‐ <text:line-break/><text:span text:style-name="T1"> </text:span><text:span text:style-name="T2">(22/16) </text:span> ⲥⲱⲧⲙ̅ ⲛⲁϥ ⲉⲧⲃⲉ ⲡⲟⲩⲟⲉⲓⲛ ⲛ̅ⲧⲉⲡⲓⲛⲟⲓⲁ <text:line-break/><text:span text:style-name="T1"> </text:span><text:span text:style-name="T2">(22/17) </text:span> ⲉⲧϣⲟⲟⲡ ⲛ̅ϩⲏⲧϥ ⲉⲧⲥⲱϩⲉ ⲙ̅ⲙⲟϥ ϩⲙ̅ ⲡⲉϥ‐ <text:line-break/><text:span text:style-name="T1"> </text:span><text:span text:style-name="T2">(22/18) </text:span> ⲙⲉⲉⲩⲉ ⲛ̅ϩⲟⲩⲟ ⲁⲡϣⲟⲣⲡ’ ⲛ̅ⲁⲣⲭⲱⲛ ⲁⲩⲱ ⲁϥ‐ <text:line-break/><text:span text:style-name="T1"> </text:span><text:span text:style-name="T2">(22/19) </text:span> ⲟⲩⲱϣⲉ ⲁⲉⲓⲛⲉ ⲛ̅ⲧϭⲟⲙ ⲉⲃⲟⲗ ⲉⲛⲧⲁϥⲧⲁⲁⲥ <text:line-break/><text:span text:style-name="T1"> </text:span><text:span text:style-name="T2">(22/20) </text:span> ⲛⲁϥ’ ⲉⲃⲟⲗ ϩⲓⲧⲟⲟⲧϥ ⲁⲩⲱ ⲁϥⲉⲓⲛⲉ ⲛ̅ⲟⲩⲃ̅ϣⲉ <text:line-break/><text:span text:style-name="T1"> </text:span><text:span text:style-name="T2">(22/21) </text:span> ⲁϫⲛ̅ ⲁⲇⲁⲙ ⲁⲩⲱ ⲡⲉϫⲁⲉⲓ ⲙ̅ⲡⲥⲱ̅ⲣ̅ ϫⲉ ⲟⲩ ⲧⲉ <text:line-break/><text:span text:style-name="T1"> </text:span><text:span text:style-name="T2">(22/22) </text:span> ⲧⲃ̅ϣⲉ ⲛ̅ⲧⲟϥ ⲇⲉ ⲡⲉϫⲁϥ ϫⲉ ⲛ̅ⲑⲉ ⲁⲛ ⲉⲛⲧⲁⲙⲱ‐ <text:line-break/><text:span text:style-name="T1"> </text:span><text:span text:style-name="T2">(22/23) </text:span> ⲩ̈ⲥⲏⲥ ⲥϩⲁⲓ̈ ⲉⲁⲕⲥⲱⲧⲙ̅ ⲁϥϫⲟⲟⲥ ⲅⲁⲣ ϩⲣⲁⲓ̈ ϩⲙ̅ <text:line-break/><text:span text:style-name="T1"> </text:span><text:span text:style-name="T2">(22/24) </text:span> ⲡⲉϥϣⲟⲣⲡ ⲛ̅ϫⲱⲙⲉ ϫⲉ ⲁϥϫⲧⲟ ⲙ̅ⲙⲟϥ ⲁⲗⲗⲁ <text:line-break/><text:span text:style-name="T1"> </text:span><text:span text:style-name="T2">(22/25) </text:span> ϩⲛ̅ ⲛⲉϥⲁⲓⲥⲑⲏⲥⲓⲥ ⲕⲁⲓ ⲅⲁⲣ ⲁϥϫⲟⲟⲥ ϩⲓⲧⲛ̅ ⲡⲉ‐ <text:line-break/><text:span text:style-name="T1"> </text:span><text:span text:style-name="T2">(22/26) </text:span> ⲡⲣⲟⲫⲏⲧⲏⲥ ϫⲉ ϯⲛⲁϩⲣⲟϣ ⲉϩⲣⲁⲓ̈ ⲁϫⲛ̅ ⲛⲟⲩ‐ <text:line-break/><text:span text:style-name="T1"> </text:span><text:span text:style-name="T2">(22/27) </text:span> ϩⲉⲧⲉ ϫⲉⲕⲁⲁⲥ ⲛ̅ⲛⲟⲩϯ ϩⲧⲏⲩ ⲟⲩⲧⲉ {ϫ} ⲛ̅ⲛⲟⲩ‐ <text:line-break/><text:span text:style-name="T1"> </text:span><text:span text:style-name="T2">(22/28) </text:span> ⲛⲁⲩ ⲉⲃⲟⲗ ⲧⲟⲧⲉ ⲧⲉⲡⲓⲛⲟⲓⲁ ⲙ̅ⲡⲟⲩⲟⲉⲓⲛ ⲁⲥ‐ <text:line-break/><text:span text:style-name="T1"> </text:span><text:span text:style-name="T2">(22/29) </text:span> ϩⲱⲡ’ ⲛ̅ϩⲏⲧϥ ⲁⲩⲱ ⲁϥⲟⲩⲱϣⲉ ⲛ̅ϭⲓ ⲡⲣⲱⲧⲁⲣ‐ <text:line-break/><text:span text:style-name="T1"> </text:span><text:span text:style-name="T2">(22/30) </text:span> ⲭⲱⲛ ⲁⲉⲓⲛⲉ ⲙ̅ⲙⲟⲥ ⲉⲃⲟⲗ ϩⲙ̅ ⲡⲉϥ ⲥⲡⲓⲣ <text:line-break/><text:span text:style-name="T1"> </text:span><text:span text:style-name="T2">(22/31) </text:span> ⲧⲉⲡⲓⲛⲟⲓⲁ ⲇⲉ ⲙ̅ⲡⲟⲩⲟⲉⲓⲛ ⲟⲩⲁⲧⲧⲉϩⲟⲥ ⲧⲉ <text:line-break/><text:span text:style-name="T1"> </text:span><text:span text:style-name="T2">(22/32) </text:span> ⲉϥⲡⲏⲧ ⲛ̅ⲥⲱⲥ ⲛ̅ϭⲓ ⲡⲕⲁⲕⲉ ⲙ̅ⲡ̅ϥⲧⲉϩⲟⲥ ⲁⲩⲱ <text:line-break/><text:span text:style-name="T1"> </text:span><text:span text:style-name="T2">(22/33) </text:span> ⲁϥⲉⲓⲛⲉ ⲉⲃⲟⲗ ⲛ̅ⲟⲩⲙⲉⲣⲟⲥ ⲛ̅ⲧⲉ ⲧⲉϥϭⲟⲙ ⲉ‐ <text:line-break/><text:span text:style-name="T1"> </text:span><text:span text:style-name="T2">(22/34) </text:span> ⲃⲟⲗ ⲛ̅ϩⲏⲧϥ ⲁⲩⲱ ⲁϥⲧⲁⲙⲓⲟ ⲛ̅ⲕⲉⲡⲗⲁⲥⲓⲥ <text:line-break/><text:span text:style-name="T1"> </text:span><text:span text:style-name="T2">(22/35) </text:span> ϩⲛ̅ ⲟⲩⲙⲟⲣⲫⲏ ⲛ̅ⲥϩⲓⲙⲉ ⲕⲁⲧⲁ ⲡⲓⲛⲉ ⲛ̅ⲧⲉⲡⲓ‐ <text:line-break/><text:span text:style-name="T1"> </text:span><text:span text:style-name="T2">(22/36) </text:span> ⲛⲟⲓⲁ ⲉⲧⲁϩⲟⲩⲱⲛϩ ⲛⲁϥ ⲉⲃⲟⲗ ⲁⲩⲱ ⲁϥⲉⲓ‐ <text:line-break/><text:span text:style-name="T1"> </text:span><text:span text:style-name="T2">(23/1) </text:span> ⲛⲉ ⲙ̅ⲡⲙⲉⲣⲟⲥ ⲉⲛⲧⲁϥϫⲓⲧϥ ⲉⲃⲟⲗ ϩⲛ̅ ⲧϭⲟⲙ <text:line-break/><text:span text:style-name="T1"> </text:span><text:span text:style-name="T2">(23/2) </text:span> ⲙ̅ⲡⲣⲱⲙⲉ ϩⲣⲁⲓ̈ ϩⲛ̅ ⲡⲗⲁⲥⲙⲁ ⲛ̅ⲧⲙ̅ⲛ̅ⲧ̅ⲥϩⲓⲙⲉ <text:line-break/><text:span text:style-name="T1"> </text:span><text:span text:style-name="T2">(23/3) </text:span> ⲁⲩⲱ ⲕⲁⲧⲁ ⲑⲉ ⲁⲛ ⲉⲛⲧⲁ→ϥ←ϫⲟⲟⲥ ⲛ̅ϭⲓ ⲙⲱⲩ̈ⲥⲏⲥ <text:line-break/><text:span text:style-name="T1"> </text:span><text:span text:style-name="T2">(23/4) </text:span> ϫⲉ ⲧⲉϥⲃⲉⲧⲥⲡⲓⲣ ⲁⲩⲱ ⲁϥⲛⲁⲩ ⲁⲧⲥϩⲓⲙⲉ ϩⲁ‐ <text:line-break/><text:span text:style-name="T1"> </text:span><text:span text:style-name="T2">(23/5) </text:span> ⲧⲏϥ ϩⲛ̅ ⲧⲟⲩⲛⲟⲩ ⲇⲉ ⲉⲧⲙ̅ⲙⲁⲩ ⲁⲥⲟⲩⲱⲛϩ ⲉ‐ <text:line-break/><text:span text:style-name="T1"> </text:span><text:span text:style-name="T2">(23/6) </text:span> ⲃⲟⲗ’ ⲛ̅ϭⲓ ⲧⲉⲡⲓⲛⲟⲓⲁ ⲛ̅ⲟⲩⲟⲉⲓⲛ ⲉⲁⲥϭⲱⲗⲡ ⲉ‐ <text:line-break/><text:span text:style-name="T1"> </text:span><text:span text:style-name="T2">(23/7) </text:span> ⲃⲟⲗ’ ⲙ̅ⲡⲕⲁⲗⲩⲙⲙⲁ ⲉⲧⲛ̅ϩⲣⲁⲓ̈ ϩⲓϫⲛ̅ ⲡⲉϥϩⲏⲧ <text:line-break/><text:span text:style-name="T1"> </text:span><text:span text:style-name="T2">(23/8) </text:span> ⲁⲩⲱ ⲁϥⲣ̅ⲛⲏⲫⲉ ⲉⲃⲟⲗ ϩⲙ̅ ⲡϯϩⲉ ⲙ̅ⲡⲕⲁⲕⲉ <text:line-break/><text:span text:style-name="T1"> </text:span><text:span text:style-name="T2">(23/9) </text:span> ⲁⲩⲱ ⲁϥⲥⲟⲩⲛ̅ ⲧⲉϥⲉⲓⲛⲉ ⲁⲩⲱ ⲡⲉϫⲁϥ ϫⲉ <text:line-break/><text:span text:style-name="T1"> </text:span><text:span text:style-name="T2">(23/10) </text:span> ⲡⲁⲓ̈ ⲧⲉⲛⲟⲩ ⲟⲩⲕⲁⲁⲥ ⲉⲃⲟⲗ ϩⲛ̅ ⲛⲁⲕⲁⲁⲥ ⲡⲉ <text:line-break/><text:span text:style-name="T1"> </text:span><text:span text:style-name="T2">(23/11) </text:span> ⲁⲩⲱ ⲟⲩⲥⲁⲣⲝ ⲉⲃⲟⲗ ϩⲛ̅ ⲧⲁⲥⲁⲣⲝ ⲧⲉ ⲉⲧⲃⲉ ⲡⲁⲓ̈ <text:line-break/><text:span text:style-name="T1"> </text:span><text:span text:style-name="T2">(23/12) </text:span> ⲡⲣⲱⲙⲉ ⲛⲁⲕⲱ ⲛ̅ⲥⲱϥ ⲙ̅ⲡⲉϥ’ⲉⲓⲱⲧ’ ⲙⲛ̅ ⲧⲉϥ‐ <text:line-break/><text:span text:style-name="T1"> </text:span><text:span text:style-name="T2">(23/13) </text:span> ⲙⲁⲁⲩ ⲁⲩⲱ ⲛ̅ϥⲧⲟϭϥ ⲁⲧⲉϥⲥϩⲓⲙⲉ ⲁⲩⲱ ⲛ̅ⲥⲉ‐ <text:line-break/><text:span text:style-name="T1"> </text:span><text:span text:style-name="T2">(23/14) </text:span> ϣⲱⲡⲉ ⲙ̅ⲡⲉⲥⲛⲁⲩ ⲉⲩⲥⲁⲣⲝ ⲟⲩⲱⲧ ϫⲉ ⲥⲉ‐ <text:line-break/><text:span text:style-name="T1"> </text:span><text:span text:style-name="T2">(23/15) </text:span> ⲛⲁⲧⲛ̅ⲛⲟⲟⲩ ⲅⲁⲣ ⲛⲁϥ ⲙ̅ⲡⲉϥϣⲃⲣ̅ ⲛ̅ϩⲱⲧⲣ̅ <text:line-break/><text:span text:style-name="T1"> </text:span><text:span text:style-name="T2">(23/16) </text:span> ⲁⲩⲱ ϥⲛⲁⲕⲱ ⲛ̅ⲥⲱϥ ⲙ̅ⲡϥⲉⲓⲱⲧ ⲙⲛ̅ ⲧϥⲙⲁⲁⲩ <text:line-break/><text:span text:style-name="T1"> </text:span><text:span text:style-name="T2">(23/17) </text:span> {ⲁⲩⲱ ⲛ̅ϥⲧⲟϭϥ’ ⲁⲧⲉϥⲥϩⲓⲙⲉ ⲁⲩⲱ ⲛ̅ⲥⲉϣⲱⲡⲉ <text:line-break/><text:span text:style-name="T1"> </text:span><text:span text:style-name="T2">(23/18) </text:span> ⲙ̅ⲡⲉⲥⲛⲁⲩ ⲉⲩⲥⲁⲣⲝ ⲟⲩⲱⲧ ϫⲉ ⲥⲉⲛⲁⲧⲛ̅ⲛⲟ <text:line-break/><text:span text:style-name="T1"> </text:span><text:span text:style-name="T2">(23/19) </text:span> ⲟⲩ ⲅⲁⲣ ⲛⲁϥ ⲙ̅ⲡⲉϥϣⲃⲣ̅ ⲛ̅ϩⲱⲧⲣ̅ ⲁⲩⲱ ϥⲛⲁⲕⲱ <text:line-break/><text:span text:style-name="T1"> </text:span><text:span text:style-name="T2">(23/20) </text:span> ⲛ̅ⲥⲱϥ ⲙ̅ⲡϥⲉⲓⲱⲧ ⲙⲛ̅ ⲧϥ̅ⲙⲁⲁⲩ} ⲧⲛ̅ⲥⲱⲛⲉ <text:line-break/><text:span text:style-name="T1"> </text:span><text:span text:style-name="T2">(23/21) </text:span> ⲇⲉ ⲧⲥⲟⲫⲓⲁ ⲧⲁⲓ̈ ⲉⲧⲁϩⲉⲓ ⲉϩⲣⲁⲓ̈ ϩⲛ̅ ⲟⲩⲙ̅ⲛ̅ⲧ̅‐ <text:line-break/><text:span text:style-name="T1"> </text:span><text:span text:style-name="T2">(23/22) </text:span> ⲁⲕⲁⲕⲟⲥ ϫⲉⲕⲁⲁⲥ ⲉⲥⲛⲁⲥⲱϩⲉ ⲙ̅ⲡⲉⲥϣⲧⲁ <text:line-break/><text:soft-page-break/><text:span text:style-name="T1"> </text:span><text:span text:style-name="T2">(23/23) </text:span> ⲉⲧⲃⲉ ⲡⲁⲓ̈ ⲁⲩⲙⲟⲩⲧⲉ ⲉⲣⲟⲥ ϫⲉ ⲍⲱⲏ ⲉⲧⲉ ⲧⲁⲓ̈ <text:line-break/><text:span text:style-name="T1"> </text:span><text:span text:style-name="T2">(23/24) </text:span> ⲧⲉ ⲧⲙⲁⲁⲩ ⲛ̅ⲛⲉⲧⲟⲛϩ ⲉⲃⲟⲗ ϩⲓⲧⲛ̅ ⲧⲡⲣⲟⲛⲟⲓⲁ <text:line-break/><text:span text:style-name="T1"> </text:span><text:span text:style-name="T2">(23/25) </text:span> ⲛ̅ⲧⲁⲩⲑⲉⲛⲧⲉⲓⲁ’ ⲛ̅ⲧⲡⲉ ⲁⲩⲱ ⲉⲃⲟⲗ ϩⲓⲧⲟⲟⲧⲥ̅ <text:line-break/><text:span text:style-name="T1"> </text:span><text:span text:style-name="T2">(23/26) </text:span> ⲁⲩϫⲓ ϯⲡⲉ ⲛ̅ⲧⲅⲛⲱⲥⲓⲥ ⲛ̅ⲧⲉⲗⲉⲓⲟⲥ ⲁⲓ̈ⲟⲩⲱⲛϩ <text:line-break/><text:span text:style-name="T1"> </text:span><text:span text:style-name="T2">(23/27) </text:span> ⲁⲛⲟⲕ ⲉⲃⲟⲗ ⲙ̅ⲡⲥⲙⲁⲧ ⲛ̅ⲟⲩⲁⲉⲧⲟⲥ ϩⲓϫⲛ̅ <text:line-break/><text:span text:style-name="T1"> </text:span><text:span text:style-name="T2">(23/28) </text:span> ⲡϣⲏⲛ ⲙ̅ⲡⲥⲟⲟⲩⲛ ⲉⲧⲉ ⲧⲁⲓ̈ ⲧⲉ ⲧⲉⲡⲓⲛⲟⲓⲁ <text:line-break/><text:span text:style-name="T1"> </text:span><text:span text:style-name="T2">(23/29) </text:span> ⲉⲃⲟⲗ ϩⲛ̅ ⲧⲉⲡⲣⲟⲛⲟⲓⲁ ⲛ̅ⲟⲩⲟⲉⲓⲛ ⲉⲧⲧⲃ̅‐ <text:line-break/><text:span text:style-name="T1"> </text:span><text:span text:style-name="T2">(23/30) </text:span> ⲃⲏⲩ ϫⲉⲕⲁⲁⲥ ⲉⲓ̈ⲛⲁⲧⲥⲉⲃⲁⲩ ⲁⲩⲱ ⲛ̅ⲧⲁⲧⲟⲩ‐ <text:line-break/><text:span text:style-name="T1"> </text:span><text:span text:style-name="T2">(23/31) </text:span> ⲛⲟⲥⲟⲩ ⲉⲃⲟⲗ ϩⲙ̅ ⲡϣⲓⲕ ⲙ̅ⲡϩⲓⲛⲏⲃ ⲛⲉⲩ‐ <text:line-break/><text:span text:style-name="T1"> </text:span><text:span text:style-name="T2">(23/32) </text:span> ϣⲟⲟⲡ ⲅⲁⲣ ⲙ̅ⲡⲥⲛⲁⲩ ϩⲛ̅ ⲟⲩϩⲉ ⲁⲩⲱ ⲁⲩⲙ̅‐ <text:line-break/><text:span text:style-name="T1"> </text:span><text:span text:style-name="T2">(23/33) </text:span> ⲙⲉ ⲁⲡⲟⲩⲕⲱⲕ ⲁϩⲏⲩ ⲁⲥⲟⲩⲱⲛϩ ⲛⲁⲩ ⲉⲃⲟⲗ <text:line-break/><text:span text:style-name="T1"> </text:span><text:span text:style-name="T2">(23/34) </text:span> ⲛ̅ϭⲓ ⲧⲉⲡⲓⲛⲟⲓⲁ ⲉⲥⲟ ⲛ̅ⲟⲩⲟⲉⲓⲛ ⲉⲥⲧⲟⲩⲛⲟⲩⲥ <text:line-break/><text:span text:style-name="T1"> </text:span><text:span text:style-name="T2">(23/35) </text:span> ⲙ̅ⲡⲟⲩⲙⲉⲉⲩⲉ ⲉϩⲣⲁⲓ̈ ⲛ̅ⲧⲁⲣⲉϥⲙ̅ⲙⲉ ⲇⲉ ⲛ̅ϭⲓ <text:line-break/><text:span text:style-name="T1"> </text:span><text:span text:style-name="T2">(23/36) </text:span> ⲁⲗⲇⲁ̅ⲃⲁ̅ⲱ̅ⲑ̅ ϫⲉ ⲁⲩⲥⲉϩⲱⲟⲩ ⲉⲃⲟⲗ ⲙ̅ⲙⲟϥ <text:line-break/><text:span text:style-name="T1"> </text:span><text:span text:style-name="T2">(23/37) </text:span> ⲁϥⲥⲟⲩϩⲱⲣ ⲙ̅ⲡⲉϥⲕⲁϩ ⲁϥϭⲛ̅ ⲧⲥϩⲓⲙⲉ ⲉⲥ‐ <text:line-break/><text:span text:style-name="T1"> </text:span><text:span text:style-name="T2">(24/1) </text:span> ⲥⲟⲃⲧⲉ ⲙ̅ⲙⲟⲥ ⲙ̅ⲡⲉⲥϩⲟⲟⲩⲧ’ ⲛⲉϥⲟ ⲛ̅ϫⲟⲉⲓⲥ <text:line-break/><text:span text:style-name="T1"> </text:span><text:span text:style-name="T2">(24/2) </text:span> ⲉⲣⲟⲥ ⲡⲉ ⲉⲛϥⲥⲟⲟⲩⲛ ⲁⲛ ⲙ̅ⲡⲙⲩⲥⲧⲏⲣⲓⲟⲛ <text:line-break/><text:span text:style-name="T1"> </text:span><text:span text:style-name="T2">(24/3) </text:span> ⲉⲛⲧⲁϩϣⲱⲡⲉ ⲉⲃⲟⲗ ϩⲙ̅ ⲡϣⲟϫⲛⲉ ⲉⲧⲟⲩ‐ <text:line-break/><text:span text:style-name="T1"> </text:span><text:span text:style-name="T2">(24/4) </text:span> ⲁⲁⲃ· ⲛ̅ⲧⲟⲟⲩ ⲇⲉ ⲁⲩⲣ̅ϩⲛⲱϩⲉ ⲁϫⲡⲓⲟϥ ⲁⲩ‐ <text:line-break/><text:span text:style-name="T1"> </text:span><text:span text:style-name="T2">(24/5) </text:span> ⲱ ⲁϥⲟⲩⲱⲛϩ ⲉⲃⲟⲗ ⲛ̅ⲛⲉϥⲁⲅⲅⲉⲗⲟⲥ ⲛ̅ⲧⲉϥ‐ <text:line-break/><text:span text:style-name="T1"> </text:span><text:span text:style-name="T2">(24/6) </text:span> ⲙⲛ̅ⲧⲁⲧⲥⲟⲟⲩⲛ ⲧⲉⲧ’ϣⲟⲟⲡ ϩⲣⲁⲓ̈ ⲛ̅ϩⲏⲧϥ ⲁⲩ‐ <text:line-break/><text:span text:style-name="T1"> </text:span><text:span text:style-name="T2">(24/7) </text:span> ⲱ ⲁϥⲛⲟⲩϫⲟⲩ ⲉⲃⲟⲗ ϩⲙ̅ ⲡⲡⲁⲣⲁⲇⲉⲓⲥⲟⲥ ⲁⲩⲱ <text:line-break/><text:span text:style-name="T1"> </text:span><text:span text:style-name="T2">(24/8) </text:span> ⲁϥϯ ϩⲓⲱⲟⲩⲉ ⲛ̅ⲟⲩⲕⲙⲏⲙⲉ ⲛ̅ⲕⲁⲕⲉ ⲁⲩⲱ ⲁϥ‐ <text:line-break/><text:span text:style-name="T1"> </text:span><text:span text:style-name="T2">(24/9) </text:span> ⲛⲁⲩ ⲛ̅ϭⲓ ⲡⲣⲱⲧⲁⲣⲭⲱⲛ ⲉⲧⲡⲁⲣⲑⲉⲛⲟⲥ ⲉⲧⲁ‐ <text:line-break/><text:span text:style-name="T1"> </text:span><text:span text:style-name="T2">(24/10) </text:span> ϩⲉ ⲉⲣⲁⲧⲥ̅ ⲙⲛ̅ ⲁⲇⲁⲙ ⲁⲩⲱ ϫⲉ ⲁⲥⲟⲩⲱⲛϩ ⲉⲃⲟⲗ <text:line-break/><text:span text:style-name="T1"> </text:span><text:span text:style-name="T2">(24/11) </text:span> ⲛ̅ϩⲏⲧⲥ̅ ⲛ̅ϭⲓ ⲧⲉⲡⲓⲛⲟⲓⲁ ⲛ̅ⲟⲩⲟⲉⲓⲛ ⲛ̅ⲱⲛϩ <text:line-break/><text:span text:style-name="T1"> </text:span><text:span text:style-name="T2">(24/12) </text:span> ⲁⲩⲱ ⲁϥⲙⲟⲩϩ ⲛ̅ϭⲓ ⲁⲗⲇ̅ⲁ̅ⲃ̅ⲁ̅ⲱ̅ⲑ̅ ⲛ̅ⲟⲩⲙ̅ⲛⲧ̅‐ <text:line-break/><text:span text:style-name="T1"> </text:span><text:span text:style-name="T2">(24/13) </text:span> ⲁⲧⲥⲟⲟⲩⲛ ⲛ̅ⲧⲁⲣⲉⲥⲙ̅ⲙⲉ ⲇⲉ ⲛ̅ϭⲓ ⲧⲡⲣⲟⲛⲟⲓⲁ <text:line-break/><text:span text:style-name="T1"> </text:span><text:span text:style-name="T2">(24/14) </text:span> ⲙ̅ⲡⲧⲏⲣϥ ⲁⲥⲧⲛ̅ⲛ̅ⲟⲟⲩ ⲛ̅ⲛϩⲟⲉⲓⲛⲉ ⲁⲩⲱ ⲁⲩⲧⲱⲣⲡ’ <text:line-break/><text:span text:style-name="T1"> </text:span><text:span text:style-name="T2">(24/15) </text:span> ⲛ̅ⲍⲱⲏ ⲉⲃⲟⲗ ϩⲛ̅ ⲉⲩϩⲁ ⲁⲩⲱ ⲁϥϫⲱϩⲙⲉ ⲙ̅ⲙⲟⲥ <text:line-break/><text:span text:style-name="T1"> </text:span><text:span text:style-name="T2">(24/16) </text:span> ⲛ̅ϭⲓ ⲡⲣⲱⲧⲁⲣⲭⲱⲛ ⲁⲩⲱ ⲁϥϫⲡⲟ ⲉⲃⲟⲗ ⲛ̅ϩⲏⲧⲥ̅ <text:line-break/><text:span text:style-name="T1"> </text:span><text:span text:style-name="T2">(24/17) </text:span> ⲛ̅ϣⲏⲣⲉ ⲥⲛⲁⲩ ⲡϣⲟⲣⲡ’ ⲁⲩⲱ ⲡⲙⲉϩⲥⲛⲁⲩ· <text:line-break/><text:span text:style-name="T1"> </text:span><text:span text:style-name="T2">(24/18) </text:span> ⲉⲗⲱ̅ⲓ̅ⲙ̅ ⲙⲛ̅ ⲓ̅ⲁⲩⲉ̅ ⲉⲗⲱⲓ̈ ⲙⲉⲛ ⲟⲩϩⲟ ⲛ̅ⲁⲣⲕⲟⲥ <text:line-break/><text:span text:style-name="T1"> </text:span><text:span text:style-name="T2">(24/19) </text:span> ⲡⲉ ⲓ̈ⲁⲩ̅ⲉ̅ ⲇⲉ ⲟⲩϩⲟ ⲛ̅ⲉⲙⲟⲩ ⲡⲉ ⲡⲟⲩⲁ ⲙⲉⲛ <text:line-break/><text:span text:style-name="T1"> </text:span><text:span text:style-name="T2">(24/20) </text:span> ⲟⲩⲇⲓⲕⲁⲓⲟⲥ ⲡⲉ ⲡⲟⲩⲁ ⲇⲉ ⲟⲩⲁⲇⲓⲕⲟⲥ ⲡⲉ ⲓ̈ⲁ‐ <text:line-break/><text:span text:style-name="T1"> </text:span><text:span text:style-name="T2">(24/21) </text:span> ⲉⲩⲉ̅ ⲙ̅ⲉ̅ⲛ̅ ⲁϥⲣ̅ⲁⲡⲟⲕⲁⲑⲓⲥⲧⲁ ⲙ̅ⲙⲟϥ ⲉϩⲣⲁⲓ̈ <text:line-break/><text:span text:style-name="T1"> </text:span><text:span text:style-name="T2">(24/22) </text:span> ⲉϫⲙ̅ ⲡⲕⲱϩⲧ ⲙⲛ̅ ⲡⲧⲏⲩ ⲉⲗⲱⲓ̈ⲙ ⲇⲉ ⲁϥⲣ̅ⲁⲡⲟ‐ <text:line-break/><text:span text:style-name="T1"> </text:span><text:span text:style-name="T2">(24/23) </text:span> ⲕⲁⲑⲓⲥⲧⲁ ⲙ̅ⲙⲟϥ ⲉϩⲣⲁⲓ̈ ⲉϫⲙ̅ ⲡⲙⲟⲟⲩ· ⲙⲛ̅ <text:line-break/><text:span text:style-name="T1"> </text:span><text:span text:style-name="T2">(24/24) </text:span> ⲡⲕⲁϩ ⲛⲁⲓ̈ ⲇⲉ ⲁϥⲙⲟⲩⲧⲉ ⲉⲣⲟⲟⲩ ⲛ̅ⲛⲓⲣⲁⲛ <text:line-break/><text:span text:style-name="T1"> </text:span><text:span text:style-name="T2">(24/25) </text:span> ϫⲉ ⲕⲁⲓ̈ⲛ ⲁⲩⲱ ⲁⲃⲉⲗ ⲉϥⲛⲁⲩ ⲁⲧⲉϥⲡⲁⲛⲟⲩⲣ‐ <text:line-break/><text:span text:style-name="T1"> </text:span><text:span text:style-name="T2">(24/26) </text:span> ⲅⲓⲁ ϣⲁϩⲟⲩⲛ ϭⲉ ⲁⲡⲟⲟⲩ ⲛ̅ϩⲟⲟⲩ ⲁⲥϭⲱ ⲛ̅‐ <text:line-break/><text:span text:style-name="T1"> </text:span><text:span text:style-name="T2">(24/27) </text:span> ϭⲓ ϯⲥⲩⲛⲟⲩⲥⲓⲁ ⲉⲃⲟⲗ ϩⲓⲧⲛ̅ ⲡⲣⲱⲧⲁⲣⲭⲱⲛ <text:line-break/><text:span text:style-name="T1"> </text:span><text:span text:style-name="T2">(24/28) </text:span> ⲁⲩⲱ ⲁϥϫⲱ ⲛ̅ⲟⲩⲥⲡⲟⲣⲁ ⲛ̅ⲉⲡⲓⲑⲩⲙⲓⲁ ϩⲣⲁⲓ̈ <text:line-break/><text:span text:style-name="T1"> </text:span><text:span text:style-name="T2">(24/29) </text:span> ϩⲛ̅ ⲧⲁ ⲁⲇⲁⲙ ⲁϥⲧⲟⲩⲛⲟⲩⲥ ⲇⲉ ⲉⲃⲟⲗ ϩⲓⲧⲛ̅ <text:line-break/><text:span text:style-name="T1"> </text:span><text:span text:style-name="T2">(24/30) </text:span> ⲧⲥⲩⲛⲟⲩⲥⲓⲁ ⲙ̅ⲡϫⲡⲟ ⲙ̅ⲡⲉⲓⲛⲉ ⲛ̅ⲛ̅ⲥⲱⲙⲁ <text:line-break/><text:span text:style-name="T1"> </text:span><text:span text:style-name="T2">(24/31) </text:span> ⲁⲩⲱ ⲁϥⲭⲱⲣⲏⲅⲉⲓ ⲛⲁⲩ ⲉⲃⲟⲗ ϩⲙ̅ ⲡⲉϥⲡⲛ̅ⲁ̅ <text:line-break/><text:span text:style-name="T1"> </text:span><text:span text:style-name="T2">(24/32) </text:span> ⲉⲧϣⲃ̅ⲃⲓⲁⲉⲓⲧ ⲡⲓⲁⲣⲭⲱⲛ ⲇⲉ ⲥⲛⲁⲩ ⲁϥⲣ̅ⲁⲡⲟ‐ <text:line-break/><text:soft-page-break/><text:span text:style-name="T1"> </text:span><text:span text:style-name="T2">(24/33) </text:span> ⲕⲁⲑⲓⲥⲧⲁ ⲙ̅ⲙⲟⲟⲩ ⲉϩⲣⲁⲓ̈ ⲉϫⲛ̅ ϩⲛ̅ⲁⲣⲭⲏ ϩⲱⲥ‐ <text:line-break/><text:span text:style-name="T1"> </text:span><text:span text:style-name="T2">(24/34) </text:span> ⲧⲉ ⲁⲧⲟⲩⲁⲣⲭⲉⲓ ⲁϫⲙ̅ ⲡⲉⲥⲡⲏⲗⲁⲓⲟⲛ ⲛ̅ⲧⲁⲣⲉϥ‐ <text:line-break/><text:span text:style-name="T1"> </text:span><text:span text:style-name="T2">(24/35) </text:span> ⲙ̅ⲙⲉ ⲇⲉ ⲛ̅ϭⲓ ⲁⲇⲁⲙ ⲁⲡⲉⲓⲛⲉ ⲛ̅ⲧⲉϥⲡⲣⲟ‐ <text:line-break/><text:span text:style-name="T1"> </text:span><text:span text:style-name="T2">(24/36) </text:span> ⲅⲛⲱⲥⲓⲥ ⲙ̅ⲙⲓⲛ ⲙ̅ⲙⲟϥ ⲁϥϫⲡⲟ ⲙ̅ⲡⲉⲓⲛⲉ <text:line-break/><text:span text:style-name="T1"> </text:span><text:span text:style-name="T2">(25/1) </text:span> ⲙ̅ⲡϣⲏⲣⲉ ⲙ̅ⲡⲣⲱⲙⲉ ⲁϥ’ⲙⲟⲩⲧⲉ ⲉⲣⲟϥ ϫⲉ ⲥⲏⲑ <text:line-break/><text:span text:style-name="T1"> </text:span><text:span text:style-name="T2">(25/2) </text:span> ⲕⲁⲧⲁ ⲑⲉ ⲙ̅ⲡⲉϫⲡⲟ ϩⲣⲁⲓ̈ ϩⲛ̅ 〈ⲛ〉ⲁⲓⲱⲛ ϩⲟⲙⲟⲓ‐ <text:line-break/><text:span text:style-name="T1"> </text:span><text:span text:style-name="T2">(25/3) </text:span> ⲱⲥ ⲧⲕⲉⲙⲁⲁⲩ ⲁⲥⲧⲛ̅ⲛⲁⲩ ⲁⲡⲓⲧⲛ̅ ⲙ̅ⲡⲉⲥⲡ̅ⲛ̅ⲁ̅ <text:line-break/><text:span text:style-name="T1"> </text:span><text:span text:style-name="T2">(25/4) </text:span> ⲙ̅ⲡⲉⲓⲛⲉ ⲛ̅ⲧⲉϯⲛⲉ ⲙ̅ⲙⲟⲥ ⲁⲩⲱ ⲛ̅ⲟⲩⲁⲛ‐ <text:line-break/><text:span text:style-name="T1"> </text:span><text:span text:style-name="T2">(25/5) </text:span> ⲧⲓⲧⲩⲡⲟⲛ ⲛ̅ⲧⲉⲧϩⲛ̅ ⲡⲗⲏⲣⲱⲙⲁ ϫⲉ ⲥⲛⲁ‐ <text:line-break/><text:span text:style-name="T1"> </text:span><text:span text:style-name="T2">(25/6) </text:span> ⲥⲟⲃⲧⲉ ⲛ̅ⲟⲩⲙⲁ ⲛ̅ϣⲱⲡⲉ ⲛ̅ⲁⲓⲱⲛ ⲉⲧⲛ̅ⲛⲏⲩ <text:line-break/><text:span text:style-name="T1"> </text:span><text:span text:style-name="T2">(25/7) </text:span> ⲁⲡⲓⲧⲛ̅ ⲁⲩⲱ ⲁϥⲧⲥⲟⲟⲩ ⲛ̅ⲟⲩⲙⲟⲟⲩ ⲛ̅ⲃ̅ϣⲉ <text:line-break/><text:span text:style-name="T1"> </text:span><text:span text:style-name="T2">(25/8) </text:span> ⲉⲃⲟⲗ ϩⲓⲧⲛ̅ ⲡⲣⲱⲧⲁⲣⲭⲱⲛ ϫⲉⲕⲁⲁⲥ ⲛ̅ⲛⲟⲩ <text:line-break/><text:span text:style-name="T1"> </text:span><text:span text:style-name="T2">(25/9) </text:span> ⲥⲟⲩⲱⲛⲟⲩ ϫⲉ ϩⲛ̅ ⲉⲃⲟⲗ ⲧⲱⲛ ⲛⲉ ⲁⲩⲱ ⲧⲁⲓ̈ <text:line-break/><text:span text:style-name="T1"> </text:span><text:span text:style-name="T2">(25/10) </text:span> ⲧⲉ ⲑⲉ ⲉⲛⲧⲁϥϣⲱⲡⲉ ⲛ̅ϭⲓ ⲡⲉⲥⲡⲉⲣⲙⲁ ⲡⲣⲟⲥ <text:line-break/><text:span text:style-name="T1"> </text:span><text:span text:style-name="T2">(25/11) </text:span> ⲟⲩⲟⲉⲓϣ ⲉϥⲣ̅ϩⲩⲡⲟⲩⲣⲅⲉⲓ ϫⲉⲕⲁⲁⲥ ϩⲟⲧⲁⲛ <text:line-break/><text:span text:style-name="T1"> </text:span><text:span text:style-name="T2">(25/12) </text:span> ⲉϥϣⲁⲛⲉⲓ ⲉϩⲣⲁⲓ̈ ⲛ̅ϭⲓ ⲡⲉⲡⲛ̅ⲁ̅ ⲉⲃⲟⲗ ϩⲓⲧⲛ̅ <text:line-break/><text:span text:style-name="T1"> </text:span><text:span text:style-name="T2">(25/13) </text:span> ⲛⲁⲓⲱⲛ ⲉⲧⲟⲩⲁⲁⲃ ⲉϥⲛⲁⲥⲉϩⲱϥ ⲉⲣⲁⲧϥ ⲁⲩ‐ <text:line-break/><text:span text:style-name="T1"> </text:span><text:span text:style-name="T2">(25/14) </text:span> ⲱ ⲛ̅ϥⲧⲗ̅ϭⲁϥ ϩⲙ̅ ⲡϣⲧⲁ ϫⲉⲕⲁⲁⲥ ⲉⲣⲉⲡⲡⲗⲏ‐ <text:line-break/><text:span text:style-name="T1"> </text:span><text:span text:style-name="T2">(25/15) </text:span> ⲣⲱⲙⲁ ⲧⲏⲣϥ ⲛⲁϣⲱⲡⲉ ⲉϥⲟⲩⲁⲁⲃ ⲁⲩⲱ ⲛ̅‐ <text:line-break/><text:span text:style-name="T1"> </text:span><text:span text:style-name="T2">(25/16) </text:span> ⲁⲧϣⲧⲁ ⲁⲩⲱ ⲡⲉϫⲁⲉⲓ ⲁⲛⲟⲕ ⲙ̅ⲡⲥ̅ⲱ̅ⲣ̅ ϫⲉ <text:line-break/><text:span text:style-name="T1"> </text:span><text:span text:style-name="T2">(25/17) </text:span> ⲡϫⲟⲉⲓⲥ ⲛ̅ⲯⲩⲭⲟⲟⲩ ϭⲉ ⲧⲏⲣⲟⲩ ⲥⲉⲛⲁⲟⲩϫⲁⲓ <text:line-break/><text:span text:style-name="T1"> </text:span><text:span text:style-name="T2">(25/18) </text:span> ⲉϩⲟⲩⲛ ⲉⲡⲟⲩⲟⲉⲓⲛ ⲉⲧⲧⲃ̅ⲃⲏⲩ ⲁϥⲟⲩⲱϣⲃⲉ <text:line-break/><text:span text:style-name="T1"> </text:span><text:span text:style-name="T2">(25/19) </text:span> ⲡⲉϫⲁϥ ⲛⲁⲉⲓ· ϫⲉ ϩⲉⲛⲛⲟϭ ⲛⲉ ⲛⲉⲛϩⲃⲏⲩⲉ <text:line-break/><text:span text:style-name="T1"> </text:span><text:span text:style-name="T2">(25/20) </text:span> ⲉⲛⲧⲁⲩⲧⲁⲗⲟ ⲉϩⲣⲁⲓ̈ ⲉϫⲙ̅ ⲡⲉⲕⲙⲉⲉⲩ ⲟⲩⲇⲩⲥ‐ <text:line-break/><text:span text:style-name="T1"> </text:span><text:span text:style-name="T2">(25/21) </text:span> ⲕⲟⲗⲟⲛ ⲅⲁⲣ ⲡⲉ ⲉϭⲟⲗⲡⲟⲩ ⲉⲃⲟⲗ ⲛ̅ϩⲛ̅ⲕⲟ‐ <text:line-break/><text:span text:style-name="T1"> </text:span><text:span text:style-name="T2">(25/22) </text:span> ⲟⲩⲉⲓ ⲉⲓⲙⲏⲧⲓ ⲛ̅ⲛⲁⲓ̈ ⲉⲧ’ϣⲟⲟⲡ ⲉⲃⲟⲗ ϩⲛ̅ <text:line-break/><text:span text:style-name="T1"> </text:span><text:span text:style-name="T2">(25/23) </text:span> ⲧⲅⲉⲛⲉⲁ ⲛ̅ⲁⲧⲕⲓⲙ ⲛⲁⲓ̈ ⲉⲧⲉ ⲡⲉⲡⲛ̅ⲁ̅ ⲙ̅ⲡⲱⲛϩ <text:line-break/><text:span text:style-name="T1"> </text:span><text:span text:style-name="T2">(25/24) </text:span> ⲛⲁⲉⲓ ⲉϩⲣⲁⲓ̈ ⲉϫⲱⲟⲩ ⲁⲩⲱ ⲛ̅ϥϣⲱⲡⲉ ⲙⲛ̅ ⲧϭⲟⲙ <text:line-break/><text:span text:style-name="T1"> </text:span><text:span text:style-name="T2">(25/25) </text:span> ⲥⲉⲛⲁⲟⲩϫⲁⲉⲓ· ⲁⲩⲱ ⲛ̅ⲥⲉϣⲱⲡⲉ ⲛ̅ⲧⲉⲗⲉⲓⲟⲥ <text:line-break/><text:span text:style-name="T1"> </text:span><text:span text:style-name="T2">(25/26) </text:span> ⲁⲩⲱ ⲥⲉⲛⲁⲣ̅ 〈ⲙ̅ⲡ〉ϣⲁ ⲛ̅ϩⲉⲛⲙ̅ⲛ̅ⲧ̅ⲛⲟϭ ⲁⲩⲱ <text:line-break/><text:span text:style-name="T1"> </text:span><text:span text:style-name="T2">(25/27) </text:span> ⲥⲉⲛⲁⲧⲃ̅ⲃⲟ ϩⲙ̅ ⲡⲙⲁ ⲉⲧⲙ̅ⲙⲁⲩ ⲉⲃⲟⲗ ϩⲓⲧⲛ̅ <text:line-break/><text:span text:style-name="T1"> </text:span><text:span text:style-name="T2">(25/28) </text:span> ⲕⲁⲕⲓⲁ ⲛⲓⲙ ⲙⲛ̅ ⲛ̅ⲣⲟⲟⲩϣ ⲛ̅ⲧⲉ ⲧⲡⲟⲛⲏⲣⲓⲁ <text:line-break/><text:span text:style-name="T1"> </text:span><text:span text:style-name="T2">(25/29) </text:span> ⲉⲛⲥⲉϥⲓ ⲣⲟⲟⲩϣ ϭⲉ ⲉⲗⲁⲁⲩ ⲁⲛ ⲉⲓⲙⲏⲧⲓ ⲁ‐ <text:line-break/><text:span text:style-name="T1"> </text:span><text:span text:style-name="T2">(25/30) </text:span> ϯⲙⲛ̅ⲧ̅’̅ⲁⲧ’ⲧⲉⲕⲟ ⲟⲩⲁⲁⲧⲥ̅ ⲉⲩⲣ̅ⲙⲉⲗⲉⲧⲁ ⲙ̅ⲙⲟⲥ <text:line-break/><text:span text:style-name="T1"> </text:span><text:span text:style-name="T2">(25/31) </text:span> ϫⲛ̅ ⲙ̅ⲡⲓⲙⲁ ⲭⲱⲣⲓⲥ ⲟⲣⲅⲏ ϩⲓ ⲕⲱϩ 〈ϩ〉ⲓ ⲫⲑⲟ‐ <text:line-break/><text:span text:style-name="T1"> </text:span><text:span text:style-name="T2">(25/32) </text:span> ⲛⲟⲥ ϩⲓ ⲉⲡⲓⲑⲩⲙⲓⲁ ⲁⲩⲱ ⲧⲙⲛ̅ⲧ̅ⲁⲧⲥⲓ ⲛ̅ⲧⲉ <text:line-break/><text:span text:style-name="T1"> </text:span><text:span text:style-name="T2">(25/33) </text:span> ⲡⲧⲏⲣϥ ⲉⲛⲥⲉⲉⲙⲁϩⲧⲉ ⲙ̅ⲙⲟⲟⲩ ⲁⲛ ϩⲓⲧⲛ̅ <text:line-break/><text:span text:style-name="T1"> </text:span><text:span text:style-name="T2">(25/34) </text:span> ⲗⲁⲁⲩ ⲉⲓⲙⲏⲧⲓ ⲁⲧϩⲩⲡⲟⲥⲧⲁⲥⲓⲥ ⲟⲩⲁⲁⲧⲥ̅ <text:line-break/><text:span text:style-name="T1"> </text:span><text:span text:style-name="T2">(25/35) </text:span> ⲛ̅ⲧⲥⲁⲣⲝ ⲧⲁⲓ̈ ⲉⲧⲟⲩⲫⲟⲣⲉⲓ ⲙ̅ⲙⲟⲥ ⲉⲩϭⲁϣⲧ <text:line-break/><text:span text:style-name="T1"> </text:span><text:span text:style-name="T2">(25/36) </text:span> ⲉⲃⲟⲗ ⲛ̅ⲥⲁ ⲡⲟⲩⲟⲉⲓϣ ⲉⲧⲟⲩⲛⲁϭⲙ̅ ⲡⲉⲩ‐ <text:line-break/><text:span text:style-name="T1"> </text:span><text:span text:style-name="T2">(25/37) </text:span> ϣⲓⲛⲉ <text:line-break/><text:span text:style-name="T1"> </text:span><text:span text:style-name="T2">(26/1) </text:span> ⲛ̅ϩⲏⲧ̅ϥ̅ ⲉⲃⲟⲗ ϩⲓⲧⲛ̅ ⲛⲉⲧϫⲓ ⲛⲁⲓ̈ ϭⲉ ⲛ̅ϯ <text:line-break/><text:span text:style-name="T1"> </text:span><text:span text:style-name="T2">(26/2) </text:span> ⲙⲉⲓⲛⲉ ⲥⲉⲟ ⲛ̅ⲁⲝⲓⲟⲥ ⲙ̅ⲡⲱⲛϩ ⲛ̅ⲁⲧⲧⲉ <text:line-break/><text:span text:style-name="T1"> </text:span><text:span text:style-name="T2">(26/3) </text:span> ⲕⲟ ⲛ̅ϣⲁ ⲉⲛⲉϩ ⲁⲩⲱ ⲡⲧⲱϩ̅ⲙ̅ ⲉⲩⲣ̅ϩⲩ‐ <text:line-break/><text:span text:style-name="T1"> </text:span><text:span text:style-name="T2">(26/4) </text:span> ⲡⲟⲙⲉⲓⲛⲉ ϩⲁ ⲡⲧⲏⲣϥ ⲉⲩϥⲓ ⲉϩⲣⲁⲓ̈ ϩⲁ <text:line-break/><text:span text:style-name="T1"> </text:span><text:span text:style-name="T2">(26/5) </text:span> ⲡⲧⲏⲣϥ ϫⲉⲕⲁⲁⲥ ⲉⲩⲛⲁϫⲱⲕ ⲉⲃⲟⲗ <text:line-break/><text:span text:style-name="T1"> </text:span><text:span text:style-name="T2">(26/6) </text:span> ⲙ̅ⲡⲁⲅⲁⲑⲟⲛ’ ⲛ̅ⲥⲉⲕⲗⲏⲣⲟⲛⲟⲙⲉⲓ ⲛ̅ⲟⲩ‐ <text:line-break/><text:soft-page-break/><text:span text:style-name="T1"> </text:span><text:span text:style-name="T2">(26/7) </text:span> ⲱⲛϩ ϣⲁ ⲉⲛⲉϩ ⲡⲉϫⲁⲓ̈ ⲛⲁϥ ϫⲉ ⲡϫⲟ‐ <text:line-break/><text:span text:style-name="T1"> </text:span><text:span text:style-name="T2">(26/8) </text:span> ⲉⲓⲥ ⲛ̅ⲯⲩⲭⲉⲩⲉ ⲉⲧⲉ ⲙ̅ⲡⲟⲩⲉⲓⲣⲉ ⲛ̅ⲛⲓϩ‐ <text:line-break/><text:span text:style-name="T1"> </text:span><text:span text:style-name="T2">(26/9) </text:span> ⲃⲏⲩⲉ ⲛⲁⲓ̈ ⲉⲛⲧⲁⲧϭⲟⲙ ⲙ̅ⲡⲉⲡⲛ̅ⲁ̅ <text:line-break/><text:span text:style-name="T1"> </text:span><text:span text:style-name="T2">(26/10) </text:span> ⲙ̅ⲡⲱⲛϩ ⲉⲓ ⲉϩⲣⲁⲓ̈ ⲉϫⲱⲟⲩ ⲛ̅ϭⲓ ⲡⲉ‐ <text:line-break/><text:span text:style-name="T1"> </text:span><text:span text:style-name="T2">(26/11) </text:span> ⲡⲛ̅ⲁ̅ ⲡⲁⲛⲧⲏ ⲡⲁⲛⲧⲱⲥ ⲥⲉⲛⲁⲟⲩϫⲁⲓ̈ <text:line-break/><text:span text:style-name="T1"> </text:span><text:span text:style-name="T2">(26/12) </text:span> ⲁⲩⲱ ⲛⲁⲓ̈ ⲥⲉⲛⲁⲡⲱⲱⲛⲉ ⲉⲃⲟⲗ ⲧⲇⲩ‐ <text:line-break/><text:span text:style-name="T1"> </text:span><text:span text:style-name="T2">(26/13) </text:span> ⲛⲁⲙⲓⲥ ⲅⲁⲣ ⲛⲁⲉⲓ ⲉϩⲣⲁⲓ̈ ⲁϫⲛ̅ ⲣⲱⲙⲉ ⲛⲓⲙ <text:line-break/><text:span text:style-name="T1"> </text:span><text:span text:style-name="T2">(26/14) </text:span> ⲁϫⲛⲧ̅ⲥ̅ ⲅⲁⲣ ⲙⲛ̅ ϭⲟⲙ ⲛ̅ⲧⲉⲗⲁⲁⲩ ⲁϩⲉ ⲉ‐ <text:line-break/><text:span text:style-name="T1"> </text:span><text:span text:style-name="T2">(26/15) </text:span> ⲣⲁⲧ̅ϥ̅ ⲙⲛ̅ⲛ̅ⲥⲉ ⲧⲟⲩϫⲡⲟⲟⲩ ⲇⲉ ⲧⲟⲧⲉ ⲉϥ‐ <text:line-break/><text:span text:style-name="T1"> </text:span><text:span text:style-name="T2">(26/16) </text:span> ϣⲁⲛⲁϣⲁⲉⲓ ⲛ̅ϭⲓ ⲡ̅ⲛ̅ⲁ̅ ⲙ̅ⲡⲱⲛϩ ⲁⲩⲱ <text:line-break/><text:span text:style-name="T1"> </text:span><text:span text:style-name="T2">(26/17) </text:span> ϣⲁⲣⲉ ⲧϭⲟⲙ ⲉⲓ ⲛ̅ⲥϯ ⲧⲁϫⲣⲟ ⲛ̅ⲧⲯⲩⲭⲏ ⲉ‐ <text:line-break/><text:span text:style-name="T1"> </text:span><text:span text:style-name="T2">(26/18) </text:span> ⲧⲙ̅ⲙⲁⲩ ⲁⲩⲱ ⲙⲁⲣⲉϣ ⲗⲁⲁⲩ ⲣ̅ⲡⲗⲁⲛⲁ ⲙ̅‐ <text:line-break/><text:span text:style-name="T1"> </text:span><text:span text:style-name="T2">(26/19) </text:span> ⲙⲟⲥ ϩⲣⲁⲓ̈ ϩⲛ̅ ⲛⲉϩⲃⲏⲩⲉ ⲛ̅ⲧⲡⲟⲛⲏⲣⲓⲁ <text:line-break/><text:span text:style-name="T1"> </text:span><text:span text:style-name="T2">(26/20) </text:span> ⲛⲁⲓ̈ ⲇⲉ ⲉⲧⲉ ⲡⲉⲡ̅ⲛ̅ⲁ̅ ⲉⲧϣⲃ̅ⲃⲓⲁⲉⲓⲧ ⲛⲏⲩ <text:line-break/><text:span text:style-name="T1"> </text:span><text:span text:style-name="T2">(26/21) </text:span> ⲉϩⲣⲁⲓ̈ ⲉϫⲱⲟⲩ ϣⲁⲩⲥⲱⲕ ⲙ̅ⲙⲟⲟⲩ ⲉⲃⲟⲗ <text:line-break/><text:span text:style-name="T1"> </text:span><text:span text:style-name="T2">(26/22) </text:span> ϩⲓⲧⲟⲟⲧϥ̅ ⲁⲩⲱ ⲛ̅ⲥⲉⲥⲱⲣⲙ̅ ⲁⲛⲟⲕ ⲇⲉ <text:line-break/><text:span text:style-name="T1"> </text:span><text:span text:style-name="T2">(26/23) </text:span> ⲡⲉϫⲁⲓ̈ ϫⲉ ⲡϫⲟⲉⲓⲥ ⲛ̅ⲯⲩⲭⲟⲟⲩ ϭⲉ ⲛ̅‐ <text:line-break/><text:span text:style-name="T1"> </text:span><text:span text:style-name="T2">(26/24) </text:span> ⲛⲁⲓ̈ ϩⲟⲧⲁⲛ ⲉⲩϣⲁⲛⲉⲓ ⲉⲃⲟⲗ ϩⲛ̅ ⲧⲟⲩ‐ <text:line-break/><text:span text:style-name="T1"> </text:span><text:span text:style-name="T2">(26/25) </text:span> ⲥⲁⲣⲝ ⲉⲩⲛⲁⲃⲱⲕ ⲉⲧⲱⲛ ⲛ̅ⲧⲟϥ ⲇⲉ ⲁϥ ⲥⲱ‐ <text:line-break/><text:span text:style-name="T1"> </text:span><text:span text:style-name="T2">(26/26) </text:span> ⲃⲉ ⲡⲉϫⲁϥ ⲛⲁⲓ̈ ϫⲉ ⲧⲯⲩⲭⲏ ⲉⲧⲉ ⲧϭⲟⲙ <text:line-break/><text:span text:style-name="T1"> </text:span><text:span text:style-name="T2">(26/27) </text:span> ⲛⲁⲁϣⲁⲓ̈ ⲛ̅ϩⲏⲧⲥ̅ ⲡⲁⲣⲁ ⲡⲓⲡⲡ̅ⲁ̅ ⲉⲧϣⲏⲥ <text:line-break/><text:span text:style-name="T1"> </text:span><text:span text:style-name="T2">(26/28) </text:span> ⲧⲁⲓ̈ ⲅⲁⲣ ⲥϫⲟⲟⲣ ⲁⲩⲱ ϣⲁⲥⲡⲱⲧ ⲛ̅ⲥⲁⲛ <text:line-break/><text:span text:style-name="T1"> </text:span><text:span text:style-name="T2">(26/29) </text:span> ⲃⲟⲗ ⲛ̅ⲧⲡⲟⲛⲏⲣⲓⲁ ⲁⲩⲱ ⲉⲃⲟⲗ ϩⲓⲧⲙ̅ <text:line-break/><text:span text:style-name="T1"> </text:span><text:span text:style-name="T2">(26/30) </text:span> ⲡϭⲙ̅ ⲡϣⲓⲛⲉ ⲙ̅ⲡⲓⲁⲧ’ⲧⲉⲕⲟ ϣⲁⲥⲟⲩ <text:line-break/><text:span text:style-name="T1"> </text:span><text:span text:style-name="T2">(26/31) </text:span> ϫⲁⲓ̈ ⲁⲩⲱ ϣⲁⲩϫⲓⲧⲥ̅ ⲉϩⲣⲁⲓ̈ ⲉⲧⲁⲛⲁⲡⲁⲩ‐ <text:line-break/><text:span text:style-name="T1"> </text:span><text:span text:style-name="T2">(26/32) </text:span> ⲥⲓⲥ ⲛ̅ⲁⲓⲱⲛ ⲁⲛⲟⲕ ⲇⲉ ⲡⲉϫⲁⲓ̈ ϫⲉ ⲡϫⲟ‐ <text:line-break/><text:span text:style-name="T1"> </text:span><text:span text:style-name="T2">(26/33) </text:span> ⲉⲓⲥ ⲉⲓⲉ ⲛⲁⲓ̈ ϩⲱⲟⲩ ⲉⲧⲉ ⲙ̅ⲡⲟⲩⲙ̅ⲙⲉ <text:line-break/><text:span text:style-name="T1"> </text:span><text:span text:style-name="T2">(26/34) </text:span> ϫⲉ ⲛⲁ ⲛⲓⲙ ⲛⲉ ⲛⲟⲩⲯⲩⲭⲟⲟⲩⲉ ⲉⲩ‐ <text:line-break/><text:span text:style-name="T1"> </text:span><text:span text:style-name="T2">(26/35) </text:span> ⲛⲁϣⲱⲡⲉ ⲧⲱⲛ ⲁⲩⲱ ⲡⲉϫⲁϥ ⲛⲁⲓ̈ ϫⲉ <text:line-break/><text:span text:style-name="T1"> </text:span><text:span text:style-name="T2">(26/36) </text:span> ϩⲛ̅ ⲛⲉⲧⲙ̅ⲙⲁⲩ ⲁⲡⲉⲡ̅ⲛ̅ⲁ̅ ⲉⲧϣⲏⲥ ⲁϥⲁ‐ <text:line-break/><text:span text:style-name="T1"> </text:span><text:span text:style-name="T2">(27/1) </text:span> ϣⲁⲓ̈ ⲛ̅ϩⲏⲧⲟⲩ ϩⲙ̅ ⲡⲧⲣⲟⲩⲥⲱⲣⲙ̅ ⲁⲩⲱ ϣⲁϥ‐ <text:line-break/><text:span text:style-name="T1"> </text:span><text:span text:style-name="T2">(27/2) </text:span> ⲃⲁⲣⲉⲓ ⲛ̅ⲧⲉⲯⲩⲭⲏ ⲁⲩⲱ ϣⲁϥⲥⲱⲕ’ϣ ⲙ̅ⲙⲟⲥ <text:line-break/><text:span text:style-name="T1"> </text:span><text:span text:style-name="T2">(27/3) </text:span> ⲁⲛⲉϩⲃⲏⲩⲉ ⲛ̅ⲧⲉ ⲧⲡⲟⲛⲏⲣⲓⲁ ⲁⲩⲱ ⲛ̅ϥⲛⲟⲩ‐ <text:line-break/><text:span text:style-name="T1"> </text:span><text:span text:style-name="T2">(27/4) </text:span> ϫⲉ ⲙ̅ⲙⲟⲥ ⲉϩⲣⲁⲓ̈ ⲉⲩⲃ̅ϣⲉ ⲁⲩⲱ ⲙⲛ̅ⲛⲥⲁ ⲧⲣⲉⲥ‐ <text:line-break/><text:span text:style-name="T1"> </text:span><text:span text:style-name="T2">(27/5) </text:span> ⲉⲓ ⲉⲃⲟⲗ’ ϣⲁⲩⲧⲁⲁⲥ ⲉⲧⲟⲟⲧⲟⲩ ⲛ̅ⲛⲉⲝⲟⲩⲥⲓⲁ <text:line-break/><text:span text:style-name="T1"> </text:span><text:span text:style-name="T2">(27/6) </text:span> ⲛⲁⲓ̈ ⲉⲛⲧⲁⲩϣⲱⲡⲉ ⲉⲃⲟⲗ ϩⲓⲧⲛ̅ ⲡⲁⲣⲭⲱⲛ ⲁⲩ‐ <text:line-break/><text:span text:style-name="T1"> </text:span><text:span text:style-name="T2">(27/7) </text:span> ⲱ ϣⲁⲩⲙⲟⲣⲥ̅ ϩⲛ̅ ϩⲉⲛⲙⲉⲣ̅ⲣⲉ ⲛ̅ⲥⲉⲛⲟⲩϫⲉ ⲙ̅‐ <text:line-break/><text:span text:style-name="T1"> </text:span><text:span text:style-name="T2">(27/8) </text:span> ⲙⲟⲥ ⲁⲡⲉϣⲧⲉⲕⲟ ⲁⲩⲱ ϣⲁⲩⲕⲱⲧⲉ ⲛⲙ̅ⲙⲁⲥ <text:line-break/><text:span text:style-name="T1"> </text:span><text:span text:style-name="T2">(27/9) </text:span> ϣⲁⲛⲧⲥⲛⲉϩⲥⲉ ⲉⲃⲟⲗ ϩⲓⲧⲛ̅ ⲧⲃ̅ϣⲉ ⲁⲩⲱ ⲛ̅ⲥ‐ <text:line-break/><text:span text:style-name="T1"> </text:span><text:span text:style-name="T2">(27/10) </text:span> ϫⲓ ⲉⲣⲟⲥ ⲙ̅ⲡⲥⲟⲟⲩⲛ ⲁⲩⲱ ⲧⲁⲓ̈ ⲧⲉ ⲑⲉ ⲉⲥ‐ <text:line-break/><text:span text:style-name="T1"> </text:span><text:span text:style-name="T2">(27/11) </text:span> ϣⲁⲛϫⲱⲕ ⲉⲃⲟⲗ ϣⲁⲥⲟⲩϫⲁⲓ̈ ⲁⲛⲟⲕ ⲇⲉ ⲡⲉ‐ <text:line-break/><text:span text:style-name="T1"> </text:span><text:span text:style-name="T2">(27/12) </text:span> ϫⲁⲓ̈ ϫⲏⲉ ⲡϫⲟⲉⲓⲥ ⲁⲩⲱ ⲡⲱⲥ ⲁⲥⲣ̅ϣⲏⲙ ϣⲏⲙ <text:line-break/><text:span text:style-name="T1"> </text:span><text:span text:style-name="T2">(27/13) </text:span> ⲛ̅ϭⲓ ⲧⲯⲩⲭⲏ ⲁⲩⲱ ⲛ̅ⲥⲛⲁⲩϩ̅ⲥ̅ ⲉϩⲟⲩⲛ ⲁⲧⲫⲩ‐ <text:line-break/><text:span text:style-name="T1"> </text:span><text:span text:style-name="T2">(27/14) </text:span> ⲥⲓⲥ ⲛ̅ⲧⲉⲥⲙⲁⲁⲩ ⲏ ⲉϩⲟⲩⲛ ⲉⲡⲣⲱⲙⲉ ⲧⲟⲧⲉ <text:line-break/><text:span text:style-name="T1"> </text:span><text:span text:style-name="T2">(27/15) </text:span> ⲁϥⲣⲁϣⲉ ⲛ̅ⲧⲁⲣⲓϫⲛⲟⲩϥ ⲉⲡⲁⲓ̈ ⲁⲩⲱ ⲡⲉ‐ <text:line-break/><text:span text:style-name="T1"> </text:span><text:span text:style-name="T2">(27/16) </text:span> ϫⲁϥ ⲛⲁⲓ̈ ϫⲉ ⲁⲗⲏⲑⲱⲥ ⲛ̅ⲧⲕ ⲟⲩⲙⲁⲕⲁⲣⲓⲟⲥ <text:line-break/><text:span text:style-name="T1"> </text:span><text:span text:style-name="T2">(27/17) </text:span> ⲉⲡⲓⲇⲏ ⲁⲕⲣ̅ⲛⲟⲉⲓ ⲧⲯⲩⲭⲏ ⲉⲧⲙ̅ⲙⲁⲩ ϣⲁⲩ‐ <text:line-break/><text:soft-page-break/><text:span text:style-name="T1"> </text:span><text:span text:style-name="T2">(27/18) </text:span> ⲧⲣⲉⲥⲟⲩⲁϩⲥ ⲛ̅ⲥⲁ ⲕⲉⲟⲩⲉⲓⲉ ⲉⲣⲉⲡⲛⲁ ⲙ̅‐ <text:line-break/><text:span text:style-name="T1"> </text:span><text:span text:style-name="T2">(27/19) </text:span> ⲡⲱⲛϩ ⲛ̅ϩⲏⲧⲥ̅ ⲧⲁⲓ̈ ⲉϣⲁⲥⲟⲩϫⲁⲓ̈ ⲉⲃⲟⲗ <text:line-break/><text:span text:style-name="T1"> </text:span><text:span text:style-name="T2">(27/20) </text:span> ϩⲓⲧⲟⲟⲧϥ ⲙ̅ⲡⲉⲧⲙ̅ⲙⲁⲩ ⲉϣⲁⲩⲛⲟⲩϫⲉ ϭⲉ <text:line-break/><text:span text:style-name="T1"> </text:span><text:span text:style-name="T2">(27/21) </text:span> ⲁⲛ ⲙ̅ⲙⲟⲥ ⲉϩⲟⲩⲛ ⲉⲕⲉⲥⲁⲣⲝ ⲁⲩⲱ ⲡⲉϫⲁⲓ̈ <text:line-break/><text:span text:style-name="T1"> </text:span><text:span text:style-name="T2">(27/22) </text:span> ϫⲉ ⲡϫⲟⲉⲓⲥ ⲛⲁⲓ̈ ϩⲱⲟⲩ ⲉⲛⲧⲁϩⲥⲟⲟⲩⲛ ⲁⲩ‐ <text:line-break/><text:span text:style-name="T1"> </text:span><text:span text:style-name="T2">(27/23) </text:span> ⲱ ⲁⲩϩⲛ̅ⲧⲟⲩ ⲉⲃⲟⲗ ⲉⲩⲛⲁⲃⲱⲕⲉⲧⲱⲛ ⲛ̅‐ <text:line-break/><text:span text:style-name="T1"> </text:span><text:span text:style-name="T2">(27/24) </text:span> ϭⲓ ⲛⲟⲩⲯⲩⲭⲏ ⲧⲟⲧⲉ ⲡⲉϫⲁϥ ⲛⲁⲓ̈ ϫⲉ ⲡⲙⲁ <text:line-break/><text:span text:style-name="T1"> </text:span><text:span text:style-name="T2">(27/25) </text:span> ⲉⲣⲉ ⲛ̅ⲁⲅⲅⲉⲗⲟⲥ ⲛ̅ⲧⲙ̅ⲛ̅ⲧ̅ϩⲏⲕⲉ ⲛⲁⲃⲱⲕ <text:line-break/><text:span text:style-name="T1"> </text:span><text:span text:style-name="T2">(27/26) </text:span> ⲉⲙⲁⲩ ⲥⲉⲛⲁϫⲓⲧⲟⲩ ⲉⲡⲙⲁ ⲉⲧⲙ̅ⲙⲁⲩ ⲡⲙⲁ <text:line-break/><text:span text:style-name="T1"> </text:span><text:span text:style-name="T2">(27/27) </text:span> ⲉⲧⲉ ⲙⲛ̅ ⲙⲉⲧⲁⲛⲟⲓⲁ ϣⲟⲟⲡ ⲙ̅ⲙⲁⲩ ⲁⲩⲱ <text:line-break/><text:span text:style-name="T1"> </text:span><text:span text:style-name="T2">(27/28) </text:span> ⲛ̅ⲥⲉⲁⲣⲉϩ ⲉⲣⲟⲟⲩ ⲉⲡⲉϩⲟⲟⲩ ⲉⲧⲟⲩⲛⲁ‐ <text:line-break/><text:span text:style-name="T1"> </text:span><text:span text:style-name="T2">(27/29) </text:span> ⲃⲁⲥⲁⲛⲓⲍⲉ ⲛ̅ⲛⲉⲧⲁϩϫⲉ ⲟⲩⲁ ⲁⲡⲉⲡ̅ⲛ̅ⲁ̅ ⲛ̅‐ <text:line-break/><text:span text:style-name="T1"> </text:span><text:span text:style-name="T2">(27/30) </text:span> ⲥⲉⲣ̅ⲕⲟⲗⲁⲍⲉ ⲙ̅ⲙⲟⲟⲩ ϩⲛ̅ ⲟⲩⲕⲟⲗⲁⲥⲓⲥ <text:line-break/><text:span text:style-name="T1"> </text:span><text:span text:style-name="T2">(27/31) </text:span> ⲛ̅ϣⲁ ⲉⲛⲉϩ ⲁⲛⲟⲕ ⲇⲉ ⲡⲉϫⲁⲉⲓ ϫⲉ ⲡϫⲟ‐ <text:line-break/><text:span text:style-name="T1"> </text:span><text:span text:style-name="T2">(27/32) </text:span> ⲉⲓⲥ ⲛ̅ⲧⲁϥⲉⲓ ⲧⲱⲛ ⲛ̅ⲧⲟϥ ⲛ̅ϭⲓ ⲡⲉⲡ̅ⲛ̅ⲁ̅ ⲉⲧ‐ <text:line-break/><text:span text:style-name="T1"> </text:span><text:span text:style-name="T2">(27/33) </text:span> ϣⲏⲥ ⲧⲟⲧⲉ ⲡⲉϫⲁϥ ⲛⲁⲓ̈ ϫⲉ ⲡⲙⲏⲧⲣⲟⲡⲁ‐ <text:line-break/><text:span text:style-name="T1"> </text:span><text:span text:style-name="T2">(27/34) </text:span> ⲧⲱⲣ ⲡⲉⲧⲛⲁϣⲉ ⲡⲉϥⲛⲁⲉ ⲡⲉⲡ̅ⲛ̅ⲁ̅ ⲉⲧⲟⲩ‐ <text:line-break/><text:span text:style-name="T1"> </text:span><text:span text:style-name="T2">(27/35) </text:span> ⲁⲁⲃ ϩⲛ̅ ⲥⲙⲁⲧ ⲛⲓⲙ ⲡϣⲁⲛϩⲧⲏϥ ⲁⲩⲱ <text:line-break/><text:span text:style-name="T1"> </text:span><text:span text:style-name="T2">(28/1) </text:span> ⲉⲧϣⲡϩⲓⲥⲉ ⲛⲙ̅ⲙⲏⲧⲛ̅ ⲉⲧⲉ ⲡⲁⲓ̈ ⲡⲉ ⲧⲉ‐ <text:line-break/><text:span text:style-name="T1"> </text:span><text:span text:style-name="T2">(28/2) </text:span> ⲡⲓⲛⲟⲓⲁ ⲛ̅ⲧⲡⲣⲟⲛⲟⲓⲁ ⲛ̅ⲟⲩⲟⲉⲓⲛ ⲁⲩⲱ <text:line-break/><text:span text:style-name="T1"> </text:span><text:span text:style-name="T2">(28/3) </text:span> ⲁϥⲧⲟⲩⲛⲟⲩⲥ ⲙ̅ⲡⲉⲥⲡⲉⲣⲙⲁ ⲛ̅ⲧⲅⲉⲛⲉⲁ ⲛ̅‐ <text:line-break/><text:span text:style-name="T1"> </text:span><text:span text:style-name="T2">(28/4) </text:span> ⲧⲉⲗⲉⲓⲟⲛ ⲙⲛ̅ ⲡⲉϥⲙⲉⲉⲩⲉ ⲁⲩⲱ ⲡⲟⲩⲟ‐ <text:line-break/><text:span text:style-name="T1"> </text:span><text:span text:style-name="T2">(28/5) </text:span> ⲉⲓⲛ’ ⲛ̅ϣⲁ ⲉⲛⲉϩ ⲙ̅ⲡⲣⲱⲙⲉ ⲛ̅ⲧⲁⲣⲉϥⲙ̅‐ <text:line-break/><text:span text:style-name="T1"> </text:span><text:span text:style-name="T2">(28/6) </text:span> ⲙⲉ ⲛ̅ϭⲓ ⲡϣⲟⲣⲡ ⲛ̅ⲁⲣⲭⲱⲛ ϫⲉ ⲥⲉϫⲟⲥⲉ <text:line-break/><text:span text:style-name="T1"> </text:span><text:span text:style-name="T2">(28/7) </text:span> ⲡⲁⲣⲁⲣⲟϥ ϩⲙ̅ ⲡϫⲓⲥⲉ ⲁⲩⲱ ⲥⲉⲙⲉⲉⲩⲉ ⲡⲁ‐ <text:line-break/><text:span text:style-name="T1"> </text:span><text:span text:style-name="T2">(28/8) </text:span> ⲣⲁⲣⲟϥ ⲁϥⲟⲩⲱϣⲉ ϭⲉ ⲉⲁⲙⲁϩⲧⲉ ⲙ̅ⲡⲟⲩ‐ <text:line-break/><text:span text:style-name="T1"> </text:span><text:span text:style-name="T2">(28/9) </text:span> ⲙⲟⲕⲙⲉⲕ ⲉϥⲟ ⲛ̅ⲁⲧⲥⲟⲟⲩⲛ ϫⲉ ⲥⲉϫⲟⲥⲉ <text:line-break/><text:span text:style-name="T1"> </text:span><text:span text:style-name="T2">(28/10) </text:span> ⲉⲣⲟϥ ϩⲣⲁⲓ̈ ϩⲙ̅ ⲡⲙⲉⲉⲩⲉ ⲁⲩⲱ ϫⲉ ϥⲛⲁϣ <text:line-break/><text:span text:style-name="T1"> </text:span><text:span text:style-name="T2">(28/11) </text:span> ⲉⲙⲁϩⲧⲉ ⲙ̅ⲙⲟⲟⲩ ⲁⲛ ⲁϥⲉⲓⲣⲉ ⲛ̅ⲟⲩϣⲟϫⲛⲉ <text:line-break/><text:span text:style-name="T1"> </text:span><text:span text:style-name="T2">(28/12) </text:span> ⲙⲛ̅ ⲛⲉϥⲉⲝⲟⲩⲥⲓⲁ ⲉⲧⲉ ⲛⲉϥϭⲟⲙ ⲛⲉ ⲁⲩⲱ <text:line-break/><text:span text:style-name="T1"> </text:span><text:span text:style-name="T2">(28/13) </text:span> ⲁⲩⲣ̅ⲛⲟⲉⲓⲕ ⲁⲧⲥⲟⲫⲓⲁ ⲛ̅ⲛⲟⲩⲉⲣⲏⲩ ⲁⲩⲱ <text:line-break/><text:span text:style-name="T1"> </text:span><text:span text:style-name="T2">(28/14) </text:span> ⲁⲩϫⲡⲟ ⲉⲃⲟⲗ ϩⲓⲧⲟⲟⲧⲟⲩ ⲁⲩⲥⲁϣ ⲛ̅ⲧϣⲓ‐ <text:line-break/><text:span text:style-name="T1"> </text:span><text:span text:style-name="T2">(28/15) </text:span> ⲙⲁⲣⲙⲉⲛⲏ ⲉⲧⲉ ⲧⲁⲓ̈ ⲧⲉ ⲧϩⲁⲏ ⲙ̅ⲙⲣ̅ⲣⲉ ⲉⲧ‐ <text:line-break/><text:span text:style-name="T1"> </text:span><text:span text:style-name="T2">(28/16) </text:span> ϣⲃ̅ⲃⲓⲁⲉⲓⲧ ⲁⲩⲱ ⲉⲥⲟ ⲙ̅ⲙⲓⲛⲉ {ⲙ̅ⲙⲓⲛⲉ} ϫⲉ <text:line-break/><text:span text:style-name="T1"> </text:span><text:span text:style-name="T2">(28/17) </text:span> ⲥⲉϣⲃⲃⲓⲁⲉⲓⲧ’ ⲁⲛⲟⲩⲉⲣⲏⲩ ⲁⲩⲱ ⲥⲙⲟⲕϩ ⲁⲩ‐ <text:line-break/><text:span text:style-name="T1"> </text:span><text:span text:style-name="T2">(28/18) </text:span> ⲱ ⲥϭⲟⲙ ⲉⲧⲁⲓ̈ ⲉⲛⲧⲁⲩⲙⲟⲩϣϭ ⲙ̅ⲙⲟⲥ ⲛ̅ϭⲓ <text:line-break/><text:span text:style-name="T1"> </text:span><text:span text:style-name="T2">(28/19) </text:span> ⲛ̅ⲛⲟⲩⲧⲉ ⲁⲩⲱ ⲛ̅ⲁⲅⲅⲉⲗⲟⲥ ⲁⲩⲱ ⲛ̅ⲇⲁⲓⲙⲱⲛ <text:line-break/><text:span text:style-name="T1"> </text:span><text:span text:style-name="T2">(28/20) </text:span> ⲁⲩⲱ ⲛ̅ⲅⲉⲛⲉⲁ ⲧⲏⲣⲟⲩ ϣⲁϩⲟⲩⲛ ⲁⲡⲟⲟⲩ ⲛ̅‐ <text:line-break/><text:span text:style-name="T1"> </text:span><text:span text:style-name="T2">(28/21) </text:span> ϩⲟⲟⲩ ⲉⲃⲟⲗ ⲅⲁⲣ ϩⲛ̅ ⲧϩⲓⲙⲁⲣⲙⲉⲛⲏ ⲉⲧⲙ̅ⲙⲟ <text:line-break/><text:span text:style-name="T1"> </text:span><text:span text:style-name="T2">(28/22) </text:span> ⲁⲩⲟⲩⲱⲛ〈ϩ〉 ⲉⲃⲟⲗ ⲛ̅ϭⲓ ⲙⲛ̅ⲧ̅ϣⲁϥⲧⲉ ⲛⲓⲙ ⲁⲩ‐ <text:line-break/><text:span text:style-name="T1"> </text:span><text:span text:style-name="T2">(28/23) </text:span> ⲱ ⲡϫⲓⲛϭⲟⲛⲥ̅ ⲁⲩⲱ ⲡⲟⲩⲁ ⲙⲛ̅ ⲧⲙⲣ̅ⲣⲉ <text:line-break/><text:span text:style-name="T1"> </text:span><text:span text:style-name="T2">(28/24) </text:span> ⲛ̅ⲧⲃ̅ϣⲉ ⲁⲩⲱ ⲧⲙ̅ⲛ̅ⲧ̅ⲁⲧⲥⲟⲟⲩⲛ ⲁⲩⲱ ⲡⲁ‐ <text:line-break/><text:span text:style-name="T1"> </text:span><text:span text:style-name="T2">(28/25) </text:span> ⲣⲁⲅⲅⲉⲗⲓⲁ ⲛⲓⲙ ⲉⲑⲟⲣϣ ⲙⲛ̅ ⲛⲓⲛⲟⲃⲉ <text:line-break/><text:span text:style-name="T1"> </text:span><text:span text:style-name="T2">(28/26) </text:span> ⲉⲧϩⲟⲣϣ ⲙⲛ̅ ⲛⲓⲛⲟϭ ⲛ̅ϩⲣ̅ⲧⲉ ⲁⲩⲱ ⲧⲁⲓ̈ <text:line-break/><text:span text:style-name="T1"> </text:span><text:span text:style-name="T2">(28/27) </text:span> ⲧⲉ ⲑⲉ ⲉⲛⲧⲁⲩⲧ〈ⲣ〉ⲉⲧⲕⲧⲓⲥⲓⲥ ⲧⲏⲣⲥ̅ ⲣ̅ⲃⲗⲗⲏ <text:line-break/><text:span text:style-name="T1"> </text:span><text:span text:style-name="T2">(28/28) </text:span> ϫⲉⲕⲁⲁⲥ ⲛ̅ⲛⲟⲩⲥⲟⲩⲛ̅ ⲡⲛⲟⲩⲧⲉ ⲉⲧⲙ̅ⲡⲟⲩ <text:line-break/><text:span text:style-name="T1"> </text:span><text:span text:style-name="T2">(28/29) </text:span> ⲧⲡⲉ ⲧⲏⲣⲟⲩ ⲁⲩⲱ ⲉⲧⲃⲉ ⲧⲙⲣ̅ⲣⲉ ⲛ̅ⲧⲃ̅ϣⲉ <text:line-break/><text:soft-page-break/><text:span text:style-name="T1"> </text:span><text:span text:style-name="T2">(28/30) </text:span> ⲁⲩϩⲱⲡ ⲛ̅ϭⲓ ⲛⲟⲩⲛⲟⲃⲉ ⲁⲩⲙⲟⲩⲣ ⲅⲁⲣ ⲛ̅‐ <text:line-break/><text:span text:style-name="T1"> </text:span><text:span text:style-name="T2">(28/31) </text:span> ϩⲛ̅ϣⲓ ⲙⲛ̅ ϩⲛ̅ⲟⲩⲟⲉⲓϣ ⲙⲛ̅ ϩⲛ̅ⲕⲁⲓⲣⲟⲥ <text:line-break/><text:span text:style-name="T1"> </text:span><text:span text:style-name="T2">(28/32) </text:span> ⲉⲥⲟ ⲛ̅ϫⲟⲉⲓⲥ ⲁϫⲙ̅ ⲡⲧⲏⲣϥ ⲁⲩⲱ ⲁϥⲣ̅‐ <text:line-break/><text:span text:style-name="T1"> </text:span><text:span text:style-name="T2">(28/33) </text:span> ϩⲧⲏϥ ⲉϩⲣⲁⲓ̈ ⲉϫⲛ̅ ϩⲱⲃ ⲛⲓⲙ ⲉⲁϥϣⲱⲡⲉ <text:line-break/><text:span text:style-name="T1"> </text:span><text:span text:style-name="T2">(28/34) </text:span> ⲉⲃⲟⲗ ϩⲓⲧⲟⲟⲧϥ̅ ⲡⲁⲗⲓⲛ ⲁϥϣⲟϫⲛⲉ <text:line-break/><text:span text:style-name="T1"> </text:span><text:span text:style-name="T2">(28/35) </text:span> ⲁⲧⲣⲉϥⲉⲓⲛⲉ ⲛ̅ⲟⲩⲕⲁⲧⲁⲕⲗⲩⲥⲙⲟⲥ ⲉϩⲣⲁⲓ̈ <text:line-break/><text:span text:style-name="T1"> </text:span><text:span text:style-name="T2">(29/1) </text:span> ⲉϫⲙ̅ ⲡⲧⲁⲙⲓⲟ ⲙ̅ⲡⲣⲱⲙⲉ ⲧⲙ̅ⲛ̅ⲧ̅ⲛⲟϭ ⲇⲉ <text:line-break/><text:span text:style-name="T1"> </text:span><text:span text:style-name="T2">(29/2) </text:span> ⲙ̅ⲡⲟⲩⲟⲉⲓⲛ ⲛ̅ⲧⲉ ⲧⲡⲣⲟⲛⲟⲓⲁ ⲁϥⲧⲥⲉⲃⲉ <text:line-break/><text:span text:style-name="T1"> </text:span><text:span text:style-name="T2">(29/3) </text:span> ⲛⲱϩⲉ ⲁⲩⲱ ⲁϥⲧⲁϣⲉ ⲟⲉⲓϣ ⲙ̅ⲡⲉⲥⲡⲉⲣⲙⲁ <text:line-break/><text:span text:style-name="T1"> </text:span><text:span text:style-name="T2">(29/4) </text:span> ⲧⲏⲣϥ ⲉⲧⲉ ⲛⲁⲓ̈ ⲛⲉ ⲛ̅ϣⲏⲣⲉ ⲛ̅ⲛ̅ⲣⲱⲙⲉ ⲁⲩ‐ <text:line-break/><text:span text:style-name="T1"> </text:span><text:span text:style-name="T2">(29/5) </text:span> ⲱ ⲙ̅ⲡⲟⲩⲥⲱⲧⲙ̅ ⲛⲁϥ ⲛ̅ϭⲓ ⲛⲉⲧⲟ ⲛ̅ϣⲙ̅ⲙⲟ <text:line-break/><text:span text:style-name="T1"> </text:span><text:span text:style-name="T2">(29/6) </text:span> ⲉⲣⲟϥ ⲕⲁⲧⲁ ⲑⲉ ⲁⲛ ⲉⲛⲧⲁⲙⲱⲩ̈ⲥⲏⲥ ϫⲟⲟⲥ <text:line-break/><text:span text:style-name="T1"> </text:span><text:span text:style-name="T2">(29/7) </text:span> ϫⲉ ⲁⲩϩⲱⲡ ⲙ̅ⲙⲟⲟⲩ ϩⲛ̅ ⲟⲩⲕⲓⲃⲱⲧⲟⲥ ⲁⲗ‐ <text:line-break/><text:span text:style-name="T1"> </text:span><text:span text:style-name="T2">(29/8) </text:span> ⲗⲁ ⲛ̅ⲧⲁⲩϩⲱⲡ ⲙ̅ⲙⲟⲟⲩ ϩⲛ̅ ⲟⲩⲧⲟⲡⲟⲥ ⲟⲩ‐ <text:line-break/><text:span text:style-name="T1"> </text:span><text:span text:style-name="T2">(29/9) </text:span> ⲙⲟⲛⲟⲛ ⲛⲱϩⲉ ⲁⲗⲗⲁ ϩⲛ̅ⲕⲉⲣⲱⲙⲉ ⲉⲛⲁ‐ <text:line-break/><text:span text:style-name="T1"> </text:span><text:span text:style-name="T2">(29/10) </text:span> ϣⲱⲟⲩ ⲉⲃⲟⲗ ϩⲛ̅ ⲧⲅⲉⲛⲉⲁ ⲛ̅ⲁⲧⲕⲓⲙ ⲁⲩⲃⲱⲕ <text:line-break/><text:span text:style-name="T1"> </text:span><text:span text:style-name="T2">(29/11) </text:span> ⲉϩⲟⲩⲛ ⲁⲩⲧⲟⲡⲟⲥ ⲁⲩϩⲱⲡ’ ⲙ̅ⲙⲟⲟⲩ ϩⲛ̅ ⲟⲩ‐ <text:line-break/><text:span text:style-name="T1"> </text:span><text:span text:style-name="T2">(29/12) </text:span> ⲕⲗⲟⲟⲗⲉ ⲛ̅ⲟⲩⲟⲉⲓⲛ ⲁⲩⲱ ⲁϥⲥⲟⲩⲛ̅ ⲧⲉϥⲁⲩ‐ <text:line-break/><text:span text:style-name="T1"> </text:span><text:span text:style-name="T2">(29/13) </text:span> ⲑⲉⲛⲧⲉⲓⲁ ⲁⲩⲱ ⲛⲁⲥⲛ̅ⲙ̅ⲙⲁϥ ⲛ̅ϭⲓ ⲧⲁⲡⲟⲩ‐ <text:line-break/><text:span text:style-name="T1"> </text:span><text:span text:style-name="T2">(29/14) </text:span> ⲟⲉⲓⲛ ⲉⲛⲧⲁⲥⲣ̅ ⲟⲩⲟⲉⲓⲛ ⲉⲣⲟⲟⲩ ⲉⲃⲟⲗ ϫⲉ <text:line-break/><text:span text:style-name="T1"> </text:span><text:span text:style-name="T2">(29/15) </text:span> ⲁϥⲉⲓⲛⲉ ⲛ̅ⲟⲩⲕⲁⲕⲉ ⲉϩⲣⲁⲓ̈ ⲉϫⲙ̅ ⲡⲕⲁϩ ⲧⲏⲣϥ <text:line-break/><text:span text:style-name="T1"> </text:span><text:span text:style-name="T2">(29/16) </text:span> ⲁⲩⲱ ⲁϥⲧⲁⲙⲓⲟ ⲛ̅ⲟⲩϣⲟϫⲛⲉ ⲙⲛ̅ ⲛⲉϥϭⲟⲙ <text:line-break/><text:span text:style-name="T1"> </text:span><text:span text:style-name="T2">(29/17) </text:span> ⲁϥϫⲟⲟⲩ ⲛ̅ⲛⲉϥⲁⲅⲅⲉⲗⲟⲥ ϣⲁ ⲛ̅ϣⲉⲉⲣⲉ <text:line-break/><text:span text:style-name="T1"> </text:span><text:span text:style-name="T2">(29/18) </text:span> ⲛ̅ⲛ̅ⲣⲱⲙⲉ ϫⲉⲕⲁⲁⲥ ⲉⲩⲛⲁϫⲓ ⲛⲁⲩ ⲉⲃⲟⲗ <text:line-break/><text:span text:style-name="T1"> </text:span><text:span text:style-name="T2">(29/19) </text:span> ⲛ̅ϩⲏⲧⲟⲩ ⲁⲩⲱ ⲛ̅ⲥⲉⲧⲟⲩⲛⲟⲩⲥ ⲛ̅ⲟⲩⲥⲡⲉⲣ‐ <text:line-break/><text:span text:style-name="T1"> </text:span><text:span text:style-name="T2">(29/20) </text:span> ⲙⲁ ⲁⲩⲙ̅ⲧⲟⲛ ⲛⲁⲩ ⲁⲩⲱ ⲉⲧⲉ ⲙ̅ⲡⲟⲩⲙⲁⲧⲉ <text:line-break/><text:span text:style-name="T1"> </text:span><text:span text:style-name="T2">(29/21) </text:span> ⲙ̅ⲡϣⲟⲣⲡ ⲛ̅ⲧⲁⲣⲟⲩⲧⲙ̅ⲙⲉⲧⲉ ϭⲉ ⲁⲩⲥⲱ‐ <text:line-break/><text:span text:style-name="T1"> </text:span><text:span text:style-name="T2">(29/22) </text:span> ⲟⲩϩ ⲉϩⲟⲩⲛ ⲟⲛ ⲙⲛ̅ ⲛⲟⲩⲉⲣⲏⲩ ⲁⲩⲉⲓⲣⲉ ⲛ̅‐ <text:line-break/><text:span text:style-name="T1"> </text:span><text:span text:style-name="T2">(29/23) </text:span> ⲟⲩϣⲟϫⲛⲉ ϩⲓ ⲟⲩⲥⲟⲡ ⲁⲩⲧⲁⲙⲓⲟ ⲛ̅ⲟⲩ‐ <text:line-break/><text:span text:style-name="T1"> </text:span><text:span text:style-name="T2">(29/24) </text:span> ⲡⲛ̅ⲁ̅ ⲉϥϣⲏⲥ ⲙ̅ⲡⲉⲓⲛⲉ ⲙ̅ⲡ̅ⲛⲁ̅ ⲉⲧⲁϩⲉⲓ <text:line-break/><text:span text:style-name="T1"> </text:span><text:span text:style-name="T2">(29/25) </text:span> ⲉϩⲣⲁⲓ̈ ϩⲱⲥⲧⲉ ⲉⲃⲟⲗ ⲛ̅ϩⲏⲧϥ ⲁⲥⲱⲱϥ ⲛ̅‐ <text:line-break/><text:span text:style-name="T1"> </text:span><text:span text:style-name="T2">(29/26) </text:span> ⲙ̅ⲯⲩⲭⲏ ⲁⲩⲱ ⲁⲩϣⲃ̅ⲧⲟⲩϩⲙ̅ ⲡⲟⲩⲉⲓⲛⲉ <text:line-break/><text:span text:style-name="T1"> </text:span><text:span text:style-name="T2">(29/27) </text:span> ⲛ̅ϭⲓ ⲛ̅ⲁⲅⲅⲉⲗⲟⲥ ⲕⲁⲧⲁ ⲡⲓⲛⲉ ⲙ̅ⲡⲟⲩⲥⲟ‐ <text:line-break/><text:span text:style-name="T1"> </text:span><text:span text:style-name="T2">(29/28) </text:span> ⲉⲓϣ ⲉⲩⲙⲟⲩϩ ⲙ̅ⲙⲟⲟⲩ ϩⲙ̅ ⲡⲛ̅ⲁ̅ ⲛ̅ⲕⲁⲕⲉ <text:line-break/><text:span text:style-name="T1"> </text:span><text:span text:style-name="T2">(29/29) </text:span> ⲉⲛⲧⲁⲩⲣ̅ⲕⲉⲣⲁ ⲙ̅ⲙⲟϥ ⲉϫⲱⲟⲩ ⲁⲩⲱ ⲙ̅ⲡⲟ <text:line-break/><text:span text:style-name="T1"> </text:span><text:span text:style-name="T2">(29/30) </text:span> ⲛⲏⲣⲓⲁ ⲁⲩⲉⲓⲛⲉ ⲛ̅ⲛⲟⲩⲛⲟⲩⲃ ⲙⲛ̅ ⲟⲩϩⲁⲧ <text:line-break/><text:span text:style-name="T1"> </text:span><text:span text:style-name="T2">(29/31) </text:span> ⲙⲛ̅ ⲟⲩⲇⲱⲣⲟⲛ ⲙⲛ̅ ⲟⲩϩⲟⲙⲧ ⲙⲛ̅ ⲟⲩⲃⲉ‐ <text:line-break/><text:span text:style-name="T1"> </text:span><text:span text:style-name="T2">(29/32) </text:span> ⲛⲓⲡⲉ ⲙⲛ̅ ⲟⲩⲙⲉⲧⲁⲗⲗⲟⲛ ⲙⲛ̅ ⲅⲉⲛⲟⲥ <text:line-break/><text:span text:style-name="T1"> </text:span><text:span text:style-name="T2">(29/33) </text:span> ⲛⲓⲙ ⲛ̅ⲧⲉ ⲛⲓⲉⲓⲇⲟⲥ ⲁⲩⲱ ⲁⲩⲥⲱⲕ ⲛ̅ⲣ̅ⲣⲱ‐ <text:line-break/><text:span text:style-name="T1"> </text:span><text:span text:style-name="T2">(29/34) </text:span> ⲙⲉ ⲉϩⲣⲁⲓ̈ ⲁϩⲉⲛⲛⲟϭ ⲛ̅ⲣⲟⲟⲩϣ ⲛⲁⲓ̈ ⲉⲛ‐ <text:line-break/><text:span text:style-name="T1"> </text:span><text:span text:style-name="T2">(30/1) </text:span> ⲧⲁⲩⲟⲩⲁϩⲟⲩ ⲛ̅ⲥⲱⲟⲩ ⲉⲩⲥⲱⲣⲙ̅ ⲙ̅ⲙⲟⲟⲩ <text:line-break/><text:span text:style-name="T1"> </text:span><text:span text:style-name="T2">(30/2) </text:span> ϩⲛ̅ ϩⲁϩ ⲙ̅ⲡⲗⲁⲛⲏ ⲁⲩⲣ̅ϩⲗ̅ⲗⲟ ⲉⲩⲟ ⲛ̅ⲁⲧⲥⲣ̅‐ <text:line-break/><text:span text:style-name="T1"> </text:span><text:span text:style-name="T2">(30/3) </text:span> ϥⲉ ⲁⲩⲙⲟⲩ ⲙ̅ⲡⲟⲩϭⲛ̅ ⲗⲁⲁⲩ ⲙ̅ⲙⲉⲉ ⲁⲩⲱ <text:line-break/><text:span text:style-name="T1"> </text:span><text:span text:style-name="T2">(30/4) </text:span> ⲙ̅ⲡⲟⲩⲥⲟⲩⲱⲛ ⲡⲛⲟⲩⲧⲉ ⲛ̅ⲧⲙⲏⲉ ⲁⲩⲱ ⲧⲁⲓ̈ <text:line-break/><text:span text:style-name="T1"> </text:span><text:span text:style-name="T2">(30/5) </text:span> ⲧⲉ ⲑⲉ ⲉⲛⲧⲁⲩⲣ̅ ⲧⲕⲧⲓⲥⲓⲥ ⲧⲏⲣⲥ̅ ⲛϭⲁⲩⲁⲛ ⲛ̅ϣⲁ <text:line-break/><text:span text:style-name="T1"> </text:span><text:span text:style-name="T2">(30/6) </text:span> ⲉⲛⲉϩ ϫⲛ̅ ⲛ̅ⲧⲕⲁⲧⲁⲃⲟⲗⲏ ⲙ̅ⲡⲕⲟⲥⲙⲟⲥ <text:line-break/><text:span text:style-name="T1"> </text:span><text:span text:style-name="T2">(30/7) </text:span> ϣⲁϩⲣⲁⲓ̈ ⲉⲧⲉⲛⲟⲩ ⲁⲩⲱ ⲁⲩϫⲓ ⲛ̅ϩⲛ̅ⲥϩⲓⲁⲙⲉ <text:line-break/><text:soft-page-break/><text:span text:style-name="T1"> </text:span><text:span text:style-name="T2">(30/8) </text:span> ⲁⲩϫⲡⲟ ⲉⲃⲟⲗ ϩⲙ̅ ⲡⲕⲁⲕⲉ ⲛ̅ϩⲛ̅ϣⲏⲣⲉ ⲕⲁⲧⲁ <text:line-break/><text:span text:style-name="T1"> </text:span><text:span text:style-name="T2">(30/9) </text:span> ⲡⲉⲓⲛⲉ ⲙ̅ⲡⲟⲩⲡⲛ̅ⲁ̅ ⲁⲩⲱ ⲁⲩⲧⲱⲙ ⲛ̅ⲛⲟⲩ ϩⲉⲧⲉ <text:line-break/><text:span text:style-name="T1"> </text:span><text:span text:style-name="T2">(30/10) </text:span> ⲁⲩⲱ ⲁⲩϯ ⲛ̅ϣⲟⲧ ⲛⲁⲩ ⲉⲃⲟⲗ ϩⲙ̅ ⲡⲉⲛϣⲟⲧ <text:line-break/><text:span text:style-name="T1"> </text:span><text:span text:style-name="T2">(30/11) </text:span> ⲙ̅ⲡⲉⲡⲛ̅ⲁ̅ ⲉⲧϣⲏⲥ ϣⲁϩⲣⲁⲓ̈ ⲉⲧⲉⲛⲟⲩ ⲁⲛⲟⲕ <text:line-break/><text:span text:style-name="T1"> </text:span><text:span text:style-name="T2">(30/12) </text:span> ϭⲉ ⲧⲉⲡⲣⲟⲛⲟⲓⲁ ⲉⲧϫⲏⲕ ⲉⲃⲟⲗ ⲛ̅ⲧⲉ ⲡⲧⲏⲣϥ <text:line-break/><text:span text:style-name="T1"> </text:span><text:span text:style-name="T2">(30/13) </text:span> ⲁⲓ̈ϣⲃⲧ ϩⲣⲁⲓ̈ ϩⲙ̅ ⲡⲁⲥⲡⲉⲣⲙⲁ ⲛⲉⲓ̈ϣⲟⲟⲡ ⲅⲁⲣ <text:line-break/><text:span text:style-name="T1"> </text:span><text:span text:style-name="T2">(30/14) </text:span> ⲛ̅ϣⲟⲣⲡ ⲉⲓ̈ⲙⲟⲟϣⲉ ϩⲛ̅ ⲙⲁ→ⲓ̈←ⲧ ⲛⲓⲙ ⲙ̅ⲙⲟⲟϣⲉ <text:line-break/><text:span text:style-name="T1"> </text:span><text:span text:style-name="T2">(30/15) </text:span> ⲁⲛⲟⲕ ⲅⲁⲣ ⲧⲉ ⲧⲙⲛⲧⲣⲙ̅ⲙⲁⲟ ⲙ̅ⲡⲟⲩⲟⲉⲓⲛ ⲁ‐ <text:line-break/><text:span text:style-name="T1"> </text:span><text:span text:style-name="T2">(30/16) </text:span> ⲛⲟⲕ ⲡⲉ ⲡⲣ̅ ⲡⲙⲉⲉⲩⲉ ⲙ̅ⲡⲉⲡⲗⲏⲣⲱⲙⲁ ⲁⲉⲓ‐ <text:line-break/><text:span text:style-name="T1"> </text:span><text:span text:style-name="T2">(30/17) </text:span> ⲙⲟⲟϣⲉ ⲇⲉ ϩⲛ̅ ⲧⲙⲛ̅ⲧ̅ⲛⲟϭ ⲙ̅ⲡⲕⲁⲕⲉ ⲁⲩⲱ <text:line-break/><text:span text:style-name="T1"> </text:span><text:span text:style-name="T2">(30/18) </text:span> ⲁⲉⲓⲁⲛⲉⲭⲉ ϣⲁⲛϯⲃⲱⲕ ⲉϩⲟⲩⲛ ⲉⲧⲙⲏⲧⲉ <text:line-break/><text:span text:style-name="T1"> </text:span><text:span text:style-name="T2">(30/19) </text:span> ⲙ̅ⲡⲉϣⲧⲉⲕⲟ ⲁⲩⲱ ⲛ̅ⲥⲛ̅ⲧⲉ ⲙ̅ⲡⲭⲁⲟⲥ ⲁⲩ‐ <text:line-break/><text:span text:style-name="T1"> </text:span><text:span text:style-name="T2">(30/20) </text:span> ⲕⲓⲙ ⲁⲩⲱ ⲁⲛⲟⲕ ⲁⲉⲓϩⲟⲡⲧ ⲉⲣⲟⲟⲩ ⲉⲧⲃⲉ <text:line-break/><text:span text:style-name="T1"> </text:span><text:span text:style-name="T2">(30/21) </text:span> ⲧⲟⲩⲕⲁⲕⲓⲁ ⲁⲩⲱ ⲙ̅ⲡⲟⲩⲥⲟⲩⲱⲛⲧ ⲡⲁⲗⲓⲛ <text:line-break/><text:span text:style-name="T1"> </text:span><text:span text:style-name="T2">(30/22) </text:span> ⲁⲉⲓⲛⲁϩⲟⲩⲧ ⲉϩⲟⲩⲛ ⲙ̅ⲡⲙⲉϩⲥⲉⲡ ⲥⲛⲁⲩ <text:line-break/><text:span text:style-name="T1"> </text:span><text:span text:style-name="T2">(30/23) </text:span> ⲁⲩⲱ ⲁⲉⲓⲙⲟⲟϣⲉ ⲁⲉⲓⲉⲓ ⲉⲃⲟⲗ ϩⲛ̅ ⲛⲁⲡⲟⲩⲟ‐ <text:line-break/><text:span text:style-name="T1"> </text:span><text:span text:style-name="T2">(30/24) </text:span> ⲉⲓⲛ ⲉⲧⲉ ⲁⲛⲟⲕ ⲡⲉ ⲡⲣ̅ ⲡⲙⲉⲉⲩⲉ ⲛ̅ⲧⲡⲣⲟⲛⲟⲓⲁ <text:line-break/><text:span text:style-name="T1"> </text:span><text:span text:style-name="T2">(30/25) </text:span> ⲁⲉⲓⲃⲱⲕ ⲉϩⲟⲩⲛ ϩⲛ̅ ⲧⲙⲏⲧⲉ ⲙ̅ⲡⲕⲁⲕⲉ ⲁⲩⲱ <text:line-break/><text:span text:style-name="T1"> </text:span><text:span text:style-name="T2">(30/26) </text:span> ⲡⲥⲁⲛϩⲟⲩⲛ ⲛ̅ⲉⲙⲛ̅ⲧⲉ ⲉⲉⲓⲕⲱⲧⲉ ⲛ̅ⲥⲁ ⲧⲁ‐ <text:line-break/><text:span text:style-name="T1"> </text:span><text:span text:style-name="T2">(30/27) </text:span> ⲟⲓⲕⲟⲛⲟⲙⲓⲁ ⲁⲩⲱ ⲛ̅ⲥⲛ̅ⲧ̅ⲉ ⲙ̅ⲡⲭⲁⲟⲥ ⲁⲩ‐ <text:line-break/><text:span text:style-name="T1"> </text:span><text:span text:style-name="T2">(30/28) </text:span> ⲕⲓⲙ ϫⲉⲕⲁⲁⲥ ⲉⲩⲛⲁϩⲉ ⲉϩⲣⲁⲓ̈ ⲉϫⲛ̅ ⲛⲉⲧ‐ <text:line-break/><text:span text:style-name="T1"> </text:span><text:span text:style-name="T2">(30/29) </text:span> ϣⲟⲟⲡ’ ϩⲙ̅ ⲡⲭⲁⲟⲥ ⲁⲩⲱ ⲛ̅ⲥⲉⲧⲟⲕⲟⲟⲩ <text:line-break/><text:span text:style-name="T1"> </text:span><text:span text:style-name="T2">(30/30) </text:span> ⲁⲩⲱ ⲟⲛ ⲁⲉⲓⲡⲱⲧ ⲉϩⲣⲁⲓ̈ ⲉⲧⲁⲛⲟⲩⲛⲉ ⲛ̅ⲟⲩ‐ <text:line-break/><text:span text:style-name="T1"> </text:span><text:span text:style-name="T2">(30/31) </text:span> ⲟⲉⲓⲛ ϫⲉⲕⲁⲁⲥ ⲛ̅ⲛⲟⲩⲧⲉⲕⲟ ⲙ̅ⲙⲟⲟⲩ ϩⲁ‐ <text:line-break/><text:span text:style-name="T1"> </text:span><text:span text:style-name="T2">(30/32) </text:span> ⲑⲏ ⲙ̅ⲡⲟⲩⲟⲉⲓϣ ⲉⲧⲓ ϩⲙ̅ ⲡⲙⲁϩϣⲟⲙⲧ <text:line-break/><text:span text:style-name="T1"> </text:span><text:span text:style-name="T2">(30/33) </text:span> ⲛ̅ⲥⲟⲡ ⲁⲉⲓⲙⲟⲟϣⲉ ⲉⲧⲉ ⲁⲛⲟⲕ ⲡⲉ ⲡⲟⲩⲟ‐ <text:line-break/><text:span text:style-name="T1"> </text:span><text:span text:style-name="T2">(30/34) </text:span> ⲉⲓⲛ ⲉⲧϣⲟⲟⲡ ϩⲙ̅ ⲡⲟⲩⲟⲉⲓⲛ ⲁⲛⲟⲕ ⲡⲉ <text:line-break/><text:span text:style-name="T1"> </text:span><text:span text:style-name="T2">(30/35) </text:span> ⲡⲣ̅ ⲡⲙⲉⲉⲩⲉ ⲛ̅ⲧⲡⲣⲟⲛⲟⲓⲁ ϫⲉⲕⲁⲁⲥ ⲉⲉⲓⲛⲁ‐ <text:line-break/><text:span text:style-name="T1"> </text:span><text:span text:style-name="T2">(30/36) </text:span> ⲃⲱⲕ ⲉϩⲟⲩⲛ ⲉⲧⲙⲏⲧⲉ ⲙ̅ⲡⲕⲁⲕⲉ ⲁⲩⲱ ⲡⲥⲁⲛ <text:line-break/><text:span text:style-name="T1"> </text:span><text:span text:style-name="T2">(31/1) </text:span> ϩⲟⲩⲛ ⲛ̅ⲉⲙⲛ̅ⲧⲉ ⲁⲓ̈ⲙⲟⲩϩ ⲙ̅ⲡⲁϩⲟ ϩⲣⲁⲓ̈ ϩⲙ̅ <text:line-break/><text:span text:style-name="T1"> </text:span><text:span text:style-name="T2">(31/2) </text:span> ⲡⲟⲩⲟⲉⲓⲛ ⲛ̅ⲧⲥⲩⲛⲧⲉⲗⲉⲓⲁ ⲙ̅ⲡⲟⲩⲁⲓⲱⲛ <text:line-break/><text:span text:style-name="T1"> </text:span><text:span text:style-name="T2">(31/3) </text:span> ⲁⲩⲱ ⲁⲉⲓⲃⲱⲕ ⲉϩⲟⲩⲛ ⲉⲧⲙⲏⲧⲉ ⲙ̅ⲡⲟⲩϣⲧⲉ‐ <text:line-break/><text:span text:style-name="T1"> </text:span><text:span text:style-name="T2">(31/4) </text:span> ⲕⲟ ⲉⲧⲉ ⲡⲁⲓ̈ ⲡⲉ ⲡⲉϣⲧⲉⲕⲟ ⲡⲥⲱⲙⲁ ⲁⲩⲱ ⲡⲉ‐ <text:line-break/><text:span text:style-name="T1"> </text:span><text:span text:style-name="T2">(31/5) </text:span> ϫⲁⲓ̈ ϫⲉ {ϫⲉ} ⲡⲉⲧⲥⲱⲧⲙ̅ ⲧⲱⲟⲩⲛ ⲉⲃⲟⲗ ϩⲙ̅ ⲫⲓ‐ <text:line-break/><text:span text:style-name="T1"> </text:span><text:span text:style-name="T2">(31/6) </text:span> ⲛⲏⲃ ⲉⲧϩⲟⲣϣ ⲁⲩⲱ ⲁϥⲣⲓⲙⲉ ⲁⲩⲱ ⲁϥϣⲟⲩⲉ ⲣⲙ̅ⲉⲓⲏ <text:line-break/><text:span text:style-name="T1"> </text:span><text:span text:style-name="T2">(31/7) </text:span> ϩⲉⲛⲣⲙ̅ⲉⲓⲏ ⲉⲩϩⲟⲣϣ ⲁϥϥⲱⲧⲉ ⲙ̅ⲙⲟⲟⲩ ⲉⲃⲟⲗ <text:line-break/><text:span text:style-name="T1"> </text:span><text:span text:style-name="T2">(31/8) </text:span> ⲙ̅ⲙⲟϥ ⲁⲩⲱ ⲡⲉϫⲁϥ ϫⲉ ⲛⲓⲙ ⲡⲉⲧⲙⲟⲩⲧⲉ ⲙ̅ⲡⲁ‐ <text:line-break/><text:span text:style-name="T1"> </text:span><text:span text:style-name="T2">(31/9) </text:span> ⲣⲁⲛ ⲁⲩⲱ ⲛ̅ⲧⲁⲥⲉⲓ ⲛⲁⲓ̈ ⲧⲱⲛ ⲛ̅ϭⲓ ⲧⲉⲓ̈ϩⲉⲗⲡⲓⲥ <text:line-break/><text:span text:style-name="T1"> </text:span><text:span text:style-name="T2">(31/10) </text:span> ⲉⲓ̈ϣⲟⲟⲡ ϩⲣⲁⲓ̈ ϩⲛ̅ ⲙ̅ⲙⲣ̅ⲣⲉ ⲙ̅ⲡⲉϣⲧⲉⲕⲟ ⲁⲩⲱ <text:line-break/><text:span text:style-name="T1"> </text:span><text:span text:style-name="T2">(31/11) </text:span> ⲡⲉϫⲁⲉⲓ ϫⲉ ⲁⲛⲟⲕ ⲧⲉ ⲧⲡⲣⲟⲛⲟⲓⲁ ⲙ̅ⲡⲟⲩⲟⲉⲛ <text:line-break/><text:span text:style-name="T1"> </text:span><text:span text:style-name="T2">(31/12) </text:span> ⲉⲧⲃ̅ⲃⲏⲩ ⲁⲛⲟⲕ ⲡⲉ ⲡⲙⲉⲉⲩⲉ ⲙ̅ⲡⲡⲁⲣⲑⲉⲛⲓⲕⲟⲛ <text:line-break/><text:span text:style-name="T1"> </text:span><text:span text:style-name="T2">(31/13) </text:span> ⲙ̅ⲡⲛ̅ⲁ̅ ⲡⲉⲧⲥⲟϩⲉ ⲙ̅ⲙⲟⲕ ⲉϩⲣⲁⲓ̈ ⲉⲡⲧⲟⲡⲟⲥ <text:line-break/><text:span text:style-name="T1"> </text:span><text:span text:style-name="T2">(31/14) </text:span> ⲉⲧⲧⲁⲉⲓⲏⲩ ⲧⲱⲟⲩⲛⲕ ⲁⲩⲱ ⲛ̅ⲕⲣ̅ ⲡⲙⲉⲉⲩⲉ <text:line-break/><text:span text:style-name="T1"> </text:span><text:span text:style-name="T2">(31/15) </text:span> ϫⲉ ⲛ̅ⲧⲟⲕ ⲡⲉⲛⲧⲁϩⲥⲱⲧⲙ̅ ⲁⲩⲱ ⲛ̅ⲕⲟⲩϩⲁⲕ ⲁ‐ <text:line-break/><text:span text:style-name="T1"> </text:span><text:span text:style-name="T2">(31/16) </text:span> ⲧⲉⲕⲛⲟⲩⲛⲉ ⲉⲧⲉ ⲁⲛⲟⲕ ⲡⲉ ⲡϣⲁⲛϩⲧⲏϥ ⲁⲩ‐ <text:line-break/><text:span text:style-name="T1"> </text:span><text:span text:style-name="T2">(31/17) </text:span> ⲱ ⲛ̅ⲕⲣ̅ⲁⲥⲫⲁⲗⲓⲍⲉ ⲙ̅ⲙⲟⲕ ⲉⲃⲟⲗ ϩⲓⲧⲟⲟⲧⲟⲩ <text:line-break/><text:span text:style-name="T1"> </text:span><text:span text:style-name="T2">(31/18) </text:span> ⲛ̅ⲛ̅ⲁⲅⲅⲉⲗⲟⲥ ⲛ̅ⲧⲙⲛ̅ⲧϩⲏⲕⲉ ⲙⲛ̅ ⲛ̅ⲇⲁⲓⲙⲱⲛ <text:line-break/><text:soft-page-break/><text:span text:style-name="T1"> </text:span><text:span text:style-name="T2">(31/19) </text:span> ⲛ̅ⲧⲉ ⲡⲭⲁⲟⲥ ⲙⲛ̅ ⲛⲉⲧϭⲟⲗϫ ⲙ̅ⲙⲟⲕ ⲧⲏⲣⲟⲩ <text:line-break/><text:span text:style-name="T1"> </text:span><text:span text:style-name="T2">(31/20) </text:span> ⲁⲩⲱ ⲛ̅ⲕϣⲱⲡⲉ ⲉⲕⲣⲟⲉⲓⲥ ⲉⲃⲟⲗ ϩⲓⲧⲛ̅ ⲡϩⲓ‐ <text:line-break/><text:span text:style-name="T1"> </text:span><text:span text:style-name="T2">(31/21) </text:span> ⲛⲏⲃ ⲉⲧϩⲟⲣϣ ⲁⲩⲱ ⲉⲃⲟⲗ ϩⲛ̅ ⲧϭⲁⲗⲉⲥ ⲙ̅ⲡⲥⲁⲛ <text:line-break/><text:span text:style-name="T1"> </text:span><text:span text:style-name="T2">(31/22) </text:span> ϩⲟⲩⲛ ⲛ̅ⲁⲙⲛ̅ⲧⲉ ⲁⲩⲱ ⲁⲉⲓⲧⲟⲩⲛⲟⲩⲥ ⲙ̅ⲙⲟϥ <text:line-break/><text:span text:style-name="T1"> </text:span><text:span text:style-name="T2">(31/23) </text:span> ⲁⲩⲱ ⲁⲉⲓⲥⲫⲣⲁⲅⲓⲍⲉ ⲙ̅ⲙⲟϥ ϩⲛ̅ ⲡⲟⲩⲟⲉⲓⲛ <text:line-break/><text:span text:style-name="T1"> </text:span><text:span text:style-name="T2">(31/24) </text:span> ⲙ̅ⲡⲙⲟⲟⲩ ϩⲛ̅ ϯⲉ ⲛ̅ⲥⲫⲣⲁⲅⲓⲥ ϫⲉⲕⲁⲁⲥ ⲛ̅‐ <text:line-break/><text:span text:style-name="T1"> </text:span><text:span text:style-name="T2">(31/25) </text:span> ⲛⲉⲡⲙⲟⲩ ϭⲛ̅ϭⲁⲙ ⲉⲣⲟϥ ϫⲛ̅ ⲙ̅ⲡⲓⲛⲁⲩ ⲁⲩⲱ <text:line-break/><text:span text:style-name="T1"> </text:span><text:span text:style-name="T2">(31/26) </text:span> ⲉⲓⲥϩⲏⲏⲧⲉ ⲧⲉⲛⲟⲩ ⲉⲓⲛⲁⲃⲱⲕ ⲉϩⲣⲁⲓ̈ ⲁⲡⲧⲉ‐ <text:line-break/><text:span text:style-name="T1"> </text:span><text:span text:style-name="T2">(31/27) </text:span> ⲗⲉⲓⲟⲛ ⲛ̅ⲁⲓⲱⲛ ⲁⲉⲓϫⲱⲕ ⲛⲁⲕ ⲉⲃⲟⲗ ⲛ̅ϩⲱⲃ <text:line-break/><text:span text:style-name="T1"> </text:span><text:span text:style-name="T2">(31/28) </text:span> ⲛⲓⲙ ϩⲣⲁⲓ̈ ϩⲛ̅ ⲛⲉⲕⲙⲁⲁϫⲉ ⲁⲛⲟⲕ ⲇⲉ <text:line-break/><text:span text:style-name="T1"> </text:span><text:span text:style-name="T2">(31/29) </text:span> ⲁⲓ̈ϫⲉ ϩⲱⲃ ⲛⲓⲙ ⲉⲣⲟⲕ ϫⲉⲕⲁⲁⲥ ⲉⲕⲛⲁⲥϩⲁⲓ̈‐ <text:line-break/><text:span text:style-name="T1"> </text:span><text:span text:style-name="T2">(31/30) </text:span> ⲥⲟⲩ ⲛ̅ⲕⲧⲁⲁⲩ ⲛ̅ⲛⲉⲕϣⲃⲣ̅ ⲡⲛ̅ⲁ̅ ϩⲛ̅ ⲟⲩϩⲱⲡ <text:line-break/><text:span text:style-name="T1"> </text:span><text:span text:style-name="T2">(31/31) </text:span> ⲡⲁⲓ̈ ⲅⲁⲣ ⲡⲉ ⲡⲙⲩⲥⲧⲏⲣⲓⲟⲛ ⲛ̅ⲧⲅⲉⲛⲉⲁ ⲛ̅ⲁⲧ‐ <text:line-break/><text:span text:style-name="T1"> </text:span><text:span text:style-name="T2">(31/32) </text:span> ⲕⲓⲙ ⲁⲩⲱ ⲁϥϯ ⲛⲁⲉⲓ ⲛⲁϥ ⲛ̅ϭⲓ ⲡⲥ̅ⲱ̅ⲣ̅ ϫⲉⲕⲁ‐ <text:line-break/><text:span text:style-name="T1"> </text:span><text:span text:style-name="T2">(31/33) </text:span> ⲁⲥ ⲉϥⲛⲁⲥⲁϩⲟⲩ ⲁⲩⲱ ⲛ̅ϥⲕⲁⲁⲩ ϩⲛ̅ ⲟⲩ‐ <text:line-break/><text:span text:style-name="T1"> </text:span><text:span text:style-name="T2">(31/34) </text:span> ⲧⲁϫⲣⲟ ⲁⲩⲱ ⲡⲉϫⲁϥ ⲛⲁϥ ϫⲉ ϥⲥϩⲟⲩⲟⲣⲧ <text:line-break/><text:span text:style-name="T1"> </text:span><text:span text:style-name="T2">(31/35) </text:span> ⲛ̅ϭⲓ ⲟⲩⲟⲛ ⲛⲓⲙ ⲉⲧⲛⲁϯ ⲛⲁⲓ̈ ϩⲁ ⲟⲩⲇⲱ‐ <text:line-break/><text:span text:style-name="T1"> </text:span><text:span text:style-name="T2">(31/36) </text:span> ⲣⲟⲛ ⲏ ⲉⲧⲃⲉ ⲟⲩϩⲛⲉⲟⲩⲱⲙ ⲏ ⲉⲧⲃⲉ ⲟⲩ‐ <text:line-break/><text:span text:style-name="T1"> </text:span><text:span text:style-name="T2">(31/37) </text:span> ⲥⲱ ⲏ ⲉⲧⲃⲉ ⲟⲩϣⲧⲏⲛ ⲏ ⲉⲧⲃⲉ ⲕⲉ ϩⲱⲃ <text:line-break/><text:span text:style-name="T1"> </text:span><text:span text:style-name="T2">(32/1) </text:span> ⲛ̅ⲧⲉⲓⲙⲉⲓⲛⲉ ⲁⲩⲱ ⲛⲁⲓ̈ ⲁⲩⲧⲁⲁⲩ ⲛⲁϥ <text:line-break/><text:span text:style-name="T1"> </text:span><text:span text:style-name="T2">(32/2) </text:span> ϩⲛ̅ ⲟⲩⲙⲩⲥⲧⲏⲣⲓⲟⲛ ⲁⲩⲱ ϩⲛ̅ ⲧⲟⲩⲛⲟⲩ <text:line-break/><text:span text:style-name="T1"> </text:span><text:span text:style-name="T2">(32/3) </text:span> ⲁϥⲣ̅ ⲁⲧⲟⲩⲱⲛϩ ⲉⲃⲟⲗ ⲙ̅ⲡⲉϥⲙ̅ⲧⲟ ⲉⲃⲟⲗ <text:line-break/><text:span text:style-name="T1"> </text:span><text:span text:style-name="T2">(32/4) </text:span> ⲁⲩⲱ ⲁϥⲉⲓ ϣⲁ ⲛⲉϥϣⲃⲣ̅ ⲙⲁⲑⲏⲧⲏⲥ ⲁϥⲧⲉ <text:line-break/><text:span text:style-name="T1"> </text:span><text:span text:style-name="T2">(32/5) </text:span> ⲟⲩⲱ ⲉⲣⲟⲟⲩ ⲛ̅ⲛⲉⲛⲧⲁⲡⲥ̅ⲱ̅ⲣ̅ ϫⲟⲟⲩ ⲛⲁϥ <text:line-break/><text:span text:style-name="T1"> </text:span><text:span text:style-name="T2">(32/6) </text:span> ⲓ̅ⲥ̅ ⲡⲉⲭⲣ̅ⲥ̅ ϩⲁⲙⲏⲛ <text:line-break/><text:span text:style-name="T1"> </text:span><text:span text:style-name="T2">(32/7) </text:span> ⲕⲁ̅ⲧ̅ⲁ̅ ⲓ̈ⲱϩ̅ⲁⲛ̅ⲛⲏ̅ⲛ̅ <text:line-break/><text:span text:style-name="T1"> </text:span><text:span text:style-name="T2">(32/8) </text:span> ⲛ̅ <text:line-break/><text:span text:style-name="T1"> </text:span><text:span text:style-name="T2">(32/9) </text:span> ⲁ̅ⲡ̅ⲟⲕⲣ̅ⲩ̅ⲫⲟ̅ⲛ̅ </text:p>
      <text:p text:style-name="P2"/>
      <text:p text:style-name="P1">( codex II ) The Gospel of Thomas</text:p>
      <text:p text:style-name="P3"><text:span text:style-name="T1"> </text:span><text:span text:style-name="T2">(32/10) </text:span> §ⲛⲁⲉⲓ ⲛⲉ ⲛϣⲁϫⲉ ⲉⲑⲏⲡ’ ⲉⲛⲧⲁⲓ̅ⲥ̅ ⲉⲧⲟⲛϩ <text:line-break/><text:span text:style-name="T1"> </text:span><text:span text:style-name="T2">(32/11) </text:span> ϫⲟⲟⲩ ⲁⲩⲱ ⲁϥⲥϩⲁⲓ̈ⲥⲟⲩ ⲛϭⲓ ⲇⲓⲇⲩⲙⲟⲥ <text:line-break/><text:span text:style-name="T1"> </text:span><text:span text:style-name="T2">(32/12) </text:span> ⲓ̈ⲟⲩⲇⲁⲥ ⲑⲱⲙⲁⲥ ⲁⲩⲱ ⲡⲉϫⲁϥ ϫⲉ ⲡⲉ‐ <text:line-break/><text:span text:style-name="T1"> </text:span><text:span text:style-name="T2">(32/13) </text:span> ⲧⲁϩⲉ ⲉⲑⲉⲣⲙⲏⲛⲉⲓⲁ ⲛⲛⲉⲉⲓϣⲁϫⲉ ϥⲛⲁ‐ <text:line-break/><text:span text:style-name="T1"> </text:span><text:span text:style-name="T2">(32/14) </text:span> ϫⲓϯⲡⲉ ⲁⲛ ⲙⲡⲙⲟⲩ’ ⲡⲉϫⲉ ⲓ̅ⲥ̅ ⲙⲛⲧⲣⲉϥ’‐ <text:line-break/><text:span text:style-name="T1"> </text:span><text:span text:style-name="T2">(32/15) </text:span> ⲗⲟ ⲛϭⲓ ⲡⲉⲧ’ϣⲓⲛⲉ ⲉϥ’ϣⲓⲛⲉ ϣⲁⲛⲧⲉϥ’‐ <text:line-break/><text:span text:style-name="T1"> </text:span><text:span text:style-name="T2">(32/16) </text:span> ϭⲓⲛⲉ ⲁⲩⲱ ϩⲟⲧⲁⲛ’ ⲉϥϣⲁⲛϭⲓⲛⲉ ϥⲛⲁ’‐ <text:line-break/><text:span text:style-name="T1"> </text:span><text:span text:style-name="T2">(32/17) </text:span> ϣⲧⲣⲧⲣ ⲁⲩⲱ ⲉϥϣⲁⲛ’ϣⲧⲟⲣⲧⲣ ϥⲛⲁⲣ <text:line-break/><text:span text:style-name="T1"> </text:span><text:span text:style-name="T2">(32/18) </text:span> ϣⲡⲏⲣⲉ ⲁⲩⲱ ϥⲛⲁⲣ <text:line-break/><text:span text:style-name="T1"> </text:span><text:span text:style-name="T2">(32/19) </text:span> ⲣⲣⲟ ⲉϫⲙ ⲡⲧⲏⲣϥ ⲡⲉϫⲉ ⲓ̅ⲥ̅ ϫⲉ ⲉⲩϣⲁ‐ <text:line-break/><text:span text:style-name="T1"> </text:span><text:span text:style-name="T2">(32/20) </text:span> ϫⲟⲟⲥ ⲛⲏⲧⲛ ⲛϭⲓ ⲛⲉⲧ’ⲥⲱⲕ ϩⲏⲧ’ ⲧⲏⲩⲧⲛ <text:line-break/><text:span text:style-name="T1"> </text:span><text:span text:style-name="T2">(32/21) </text:span> ϫⲉ ⲉⲓⲥϩⲏⲏⲧⲉ ⲉⲧ’ⲙⲛⲧⲉⲣⲟ ϩⲛ ⲧⲡⲉ ⲉ‐ <text:line-break/><text:span text:style-name="T1"> </text:span><text:span text:style-name="T2">(32/22) </text:span> ⲉⲓⲉ ⲛϩⲁⲗⲏⲧ’ ⲛⲁⲣ ϣⲟⲣⲡ’ ⲉⲣⲱⲧⲛ ⲛⲧⲉ <text:line-break/><text:span text:style-name="T1"> </text:span><text:span text:style-name="T2">(32/23) </text:span> ⲧⲡⲉ ⲉⲩϣⲁⲛϫⲟⲟⲥ ⲛⲏⲧⲛ ϫⲉ ⲥϩⲛ ⲑⲁ‐ <text:line-break/><text:span text:style-name="T1"> </text:span><text:span text:style-name="T2">(32/24) </text:span> ⲗⲁⲥⲥⲁ ⲉⲉⲓⲉ ⲛⲧⲃⲧ’ ⲛⲁⲣ ϣⲟⲣⲡ’ ⲉⲣⲱⲧⲛ <text:line-break/><text:span text:style-name="T1"> </text:span><text:span text:style-name="T2">(32/25) </text:span> ⲁⲗⲗⲁ ⲧⲙⲛⲧⲉⲣⲟ ⲥⲙⲡⲉⲧⲛϩⲟⲩⲛ’ ⲁⲩⲱ <text:line-break/><text:span text:style-name="T1"> </text:span><text:span text:style-name="T2">(32/26) </text:span> ⲥⲙⲡⲉⲧⲛⲃⲁⲗ’ ϩⲟⲧⲁⲛ ⲉⲧⲉⲧⲛϣⲁⲛ‐ <text:line-break/><text:span text:style-name="T1"> </text:span><text:span text:style-name="T2">(32/27) </text:span> ⲥⲟⲩⲱⲛ ⲧⲏⲩⲧⲛ ⲧⲟⲧⲉ ⲥⲉⲛⲁⲥⲟⲩⲱⲛ <text:line-break/><text:span text:style-name="T1"> </text:span><text:span text:style-name="T2">(33/1) </text:span> ⲧⲏⲛⲉ ⲁⲩⲱ ⲧⲉⲧⲛⲁⲉⲓⲙⲉ ϫⲉ ⲛⲧⲱⲧⲛ ⲡⲉ <text:line-break/><text:span text:style-name="T1"> </text:span><text:span text:style-name="T2">(33/2) </text:span> ⲛϣⲏⲣⲉ ⲙⲡⲉⲓⲱⲧ’ ⲉⲧⲟⲛϩ ⲉϣⲱⲡⲉ ⲇⲉ <text:line-break/><text:span text:style-name="T1"> </text:span><text:span text:style-name="T2">(33/3) </text:span> ⲧⲉⲧⲛⲁⲥⲟⲩⲱⲛ ⲧⲏⲩⲧⲛ ⲁⲛ ⲉⲉⲓⲉ ⲧⲉⲧⲛ‐ <text:line-break/><text:span text:style-name="T1"> </text:span><text:span text:style-name="T2">(33/4) </text:span> ϣⲟⲟⲡ’ ϩⲛ ⲟⲩⲙⲛⲧϩⲏⲕⲉ ⲁⲩⲱ ⲛⲧⲱⲧⲛ <text:line-break/><text:span text:style-name="T1"> </text:span><text:span text:style-name="T2">(33/5) </text:span> ⲡⲉ ⲧⲙ̅ⲛ̅ⲧ̅ϩⲏⲕⲉ ⲡⲉϫⲉ ⲓ̅ⲥ̅ ϥⲛⲁϫⲛⲁⲩ ⲁⲛ <text:line-break/><text:span text:style-name="T1"> </text:span><text:span text:style-name="T2">(33/6) </text:span> ⲛϭⲓ ⲡⲣⲱⲙⲉ ⲛϩⲗⲗⲟ ϩⲛ ⲛⲉϥϩⲟⲟⲩ ⲉϫⲛⲉ <text:line-break/><text:span text:style-name="T1"> </text:span><text:span text:style-name="T2">(33/7) </text:span> ⲟⲩⲕⲟⲩⲉⲓ ⲛϣⲏⲣⲉ ϣⲏⲙ ⲉϥϩⲛ ⲥⲁϣϥ <text:line-break/><text:span text:style-name="T1"> </text:span><text:span text:style-name="T2">(33/8) </text:span> ⲛϩⲟⲟⲩ ⲉⲧⲃⲉ ⲡⲧⲟⲡⲟⲥ ⲙⲡⲱⲛϩ ⲁⲩⲱ <text:line-break/><text:span text:style-name="T1"> </text:span><text:span text:style-name="T2">(33/9) </text:span> ϥⲛⲁⲱⲛϩ ϫⲉ ⲟⲩⲛ ϩⲁϩ ⲛϣⲟⲣⲡ’ ⲛⲁⲣ ϩⲁ‐ <text:line-break/><text:span text:style-name="T1"> </text:span><text:span text:style-name="T2">(33/10) </text:span> ⲉ ⲁⲩⲱ ⲛⲥⲉϣⲱⲡⲉ ⲟⲩⲁ ⲟⲩⲱⲧ ⲡⲉϫⲉ ⲓ̅ⲥ̅ <text:line-break/><text:span text:style-name="T1"> </text:span><text:span text:style-name="T2">(33/11) </text:span> ⲥⲟⲩⲱⲛ ⲡⲉⲧⲙⲡⲙⲧⲟ ⲙⲡⲉⲕϩⲟ ⲉⲃⲟⲗ’ <text:line-break/><text:span text:style-name="T1"> </text:span><text:span text:style-name="T2">(33/12) </text:span> ⲁⲩⲱ ⲡⲉⲑⲏⲡ’ ⲉⲣⲟⲕ’ ϥⲛⲁϭⲱⲗⲡ’ ⲉⲃⲟⲗ <text:line-break/><text:span text:style-name="T1"> </text:span><text:span text:style-name="T2">(33/13) </text:span> ⲛⲁⲕ’ ⲙⲛ ⲗⲁⲁⲩ ⲅⲁⲣ ⲉϥϩⲏⲡ’ ⲉϥⲛⲁⲟⲩⲱⲛϩ <text:line-break/><text:span text:style-name="T1"> </text:span><text:span text:style-name="T2">(33/14) </text:span> ⲉⲃⲟⲗ ⲁⲛ ⲁⲩϫⲛⲟⲩϥ ⲛϭⲓ ⲛⲉϥ’ⲙⲁⲑⲏⲧⲏⲥ <text:line-break/><text:span text:style-name="T1"> </text:span><text:span text:style-name="T2">(33/15) </text:span> ⲡⲉϫⲁⲩ ⲛⲁϥ’ ϫⲉⲕ’ⲟⲩⲱϣ ⲉⲧⲣⲛ̅ⲣ̅ⲛⲏⲥⲧⲉⲩⲉ <text:line-break/><text:span text:style-name="T1"> </text:span><text:span text:style-name="T2">(33/16) </text:span> ⲁⲩⲱ ⲉϣ ⲧⲉ ⲑⲉ ⲉⲛⲁϣⲗⲏⲗ ⲉⲛⲁϯ ⲉⲗⲉ‐ <text:line-break/><text:span text:style-name="T1"> </text:span><text:span text:style-name="T2">(33/17) </text:span> ⲏⲙⲟⲥⲩⲛⲏ ⲁⲩⲱ ⲉⲛⲁⲣⲡⲁⲣⲁⲧⲏⲣⲉⲓ ⲉⲟⲩ <text:line-break/><text:span text:style-name="T1"> </text:span><text:span text:style-name="T2">(33/18) </text:span> ⲛϭⲓⲟⲩⲱⲙ’ ⲡⲉϫⲉ ⲓ̅ⲥ̅ ϫⲉ ⲙⲡⲣϫⲉ ϭⲟⲗ ⲁⲩ‐ <text:line-break/><text:span text:style-name="T1"> </text:span><text:span text:style-name="T2">(33/19) </text:span> ⲱ ⲡⲉⲧⲉⲧⲙⲙⲟⲥⲧⲉ ⲙⲙⲟϥ’ ⲙⲡⲣⲁⲁϥ ϫⲉ <text:line-break/><text:span text:style-name="T1"> </text:span><text:span text:style-name="T2">(33/20) </text:span> ⲥⲉϭⲟⲗⲡ’ ⲧⲏⲣⲟⲩ ⲉⲃⲟⲗ ⲙⲡⲉⲙⲧⲟ ⲉⲃⲟⲗ <text:line-break/><text:span text:style-name="T1"> </text:span><text:span text:style-name="T2">(33/21) </text:span> ⲛⲧⲡⲉ ⲙⲛ ⲗⲁⲁⲩ ⲅⲁⲣ ⲉϥϩⲏⲡ’ ⲉϥⲛⲁⲟⲩ‐ <text:line-break/><text:span text:style-name="T1"> </text:span><text:span text:style-name="T2">(33/22) </text:span> ⲱⲛϩ ⲉⲃⲟⲗ ⲁⲛ ⲁⲩⲱ ⲙⲛ ⲗⲁⲁⲩ ⲉϥϩⲟⲃ̅ⲥ̅ ⲉⲩ‐ <text:line-break/><text:span text:style-name="T1"> </text:span><text:span text:style-name="T2">(33/23) </text:span> ⲛⲁϭⲱ ⲟⲩⲉϣⲛ ϭⲟⲗⲡϥ’ ⲡⲉϫⲉ ⲓ̅ⲥ̅ ⲟⲩ‐ <text:line-break/><text:span text:style-name="T1"> </text:span><text:span text:style-name="T2">(33/24) </text:span> ⲙⲁⲕⲁⲣⲓⲟⲥ ⲡⲉ ⲡⲙⲟⲩⲉⲓ ⲡⲁⲉⲓ ⲉⲧⲉ <text:line-break/><text:span text:style-name="T1"> </text:span><text:span text:style-name="T2">(33/25) </text:span> ⲡⲣⲱⲙⲉ ⲛⲁⲟⲩⲟⲙϥ ⲁⲩⲱ ⲛⲧⲉ ⲡⲙⲟⲩⲉⲓ <text:line-break/><text:span text:style-name="T1"> </text:span><text:span text:style-name="T2">(33/26) </text:span> ϣⲱⲡⲉ ⲣⲣⲱⲙⲉ ⲁⲩⲱ ϥⲃⲏⲧ’ ⲛϭⲓ ⲡⲣⲱ‐ <text:line-break/><text:span text:style-name="T1"> </text:span><text:span text:style-name="T2">(33/27) </text:span> ⲙⲉ ⲡⲁⲉⲓ ⲉⲧⲉ ⲡⲙⲟⲩⲉⲓ ⲛⲁⲟⲩⲟⲙϥ ⲁⲩ‐ <text:line-break/><text:span text:style-name="T1"> </text:span><text:span text:style-name="T2">(33/28) </text:span> ⲱ ⲡⲙⲟⲩⲉⲓ ⲛⲁϣⲱⲡⲉ ⲣⲣⲱⲙⲉ ⲁⲩⲱ ⲡⲉ‐ <text:line-break/><text:soft-page-break/><text:span text:style-name="T1"> </text:span><text:span text:style-name="T2">(33/29) </text:span> ϫⲁϥ ϫⲉ ⲉⲡⲣⲱⲙⲉ ⲧⲛⲧⲱⲛ ⲁⲩⲟⲩⲱϩⲉ <text:line-break/><text:span text:style-name="T1"> </text:span><text:span text:style-name="T2">(33/30) </text:span> ⲣⲣⲙⲛϩⲏⲧ’ ⲡⲁⲉⲓ ⲛⲧⲁϩⲛⲟⲩϫⲉ ⲛⲧⲉϥⲁ‐ <text:line-break/><text:span text:style-name="T1"> </text:span><text:span text:style-name="T2">(33/31) </text:span> ⲃⲱ ⲉⲑⲁⲗⲁⲥⲥⲁ ⲁϥⲥⲱⲕ ⲙⲙⲟⲥ ⲉϩⲣⲁⲓ̈ <text:line-break/><text:span text:style-name="T1"> </text:span><text:span text:style-name="T2">(33/32) </text:span> ϩⲛ ⲑⲁⲗⲁⲥⲥⲁ ⲉⲥⲙⲉϩ ⲛⲧⲃⲧ’ ⲛⲕⲟⲩⲉⲓ ⲛ‐ <text:line-break/><text:span text:style-name="T1"> </text:span><text:span text:style-name="T2">(33/33) </text:span> ϩⲣⲁⲓ̈ ⲛϩⲏⲧⲟⲩ ⲁϥϩⲉ ⲁⲩⲛⲟϭ ⲛⲧⲃ̅ⲧ̅ ⲉⲛⲁ‐ <text:line-break/><text:span text:style-name="T1"> </text:span><text:span text:style-name="T2">(33/34) </text:span> ⲛⲟⲩϥ’ ⲛϭⲓ ⲡⲟⲩⲱϩⲉ ⲣⲣⲙⲛϩⲏⲧ ⲁϥⲛⲟⲩ‐ <text:line-break/><text:span text:style-name="T1"> </text:span><text:span text:style-name="T2">(33/35) </text:span> ϫⲉ ⲛⲛⲕⲟⲩⲉⲓ ⲧⲏⲣⲟⲩ ⲛⲧⲃⲧ’ ⲉⲃⲟⲗ̣ ⲉ[ⲡⲉ]‐ <text:line-break/><text:span text:style-name="T1"> </text:span><text:span text:style-name="T2">(34/1) </text:span> ⲥⲏⲧ’ ⲉⲑⲁⲗⲁⲥⲥⲁ ⲁϥⲥⲱⲧⲡ’ ⲙⲡⲛⲟϭ ⲛ‐ <text:line-break/><text:span text:style-name="T1"> </text:span><text:span text:style-name="T2">(34/2) </text:span> ⲧⲃ̅ⲧ̅ ⲭⲱⲣⲓⲥ ϩⲓⲥⲉ ⲡⲉⲧⲉ ⲟⲩⲛ ⲙⲁⲁϫⲉ ⲙⲙⲟϥ <text:line-break/><text:span text:style-name="T1"> </text:span><text:span text:style-name="T2">(34/3) </text:span> ⲉⲥⲱⲧⲙ ⲙⲁⲣⲉϥ’ⲥⲱⲧⲙ ⲡⲉϫⲉ ⲓ̅ⲥ̅ ϫⲉ ⲉⲓⲥϩⲏ‐ <text:line-break/><text:span text:style-name="T1"> </text:span><text:span text:style-name="T2">(34/4) </text:span> ⲏⲧⲉ’ ⲁϥⲉⲓ ⲉⲃⲟⲗ ⲛϭⲓ ⲡⲉⲧ’ⲥⲓⲧⲉ ⲁϥⲙⲉϩ ⲧⲟⲟⲧϥ <text:line-break/><text:span text:style-name="T1"> </text:span><text:span text:style-name="T2">(34/5) </text:span> ⲁϥⲛⲟⲩϫⲉ ⲁϩⲟⲉⲓⲛⲉ ⲙⲉⲛ ϩⲉ ⲉϫⲛ ⲧⲉϩⲓⲏ’ <text:line-break/><text:span text:style-name="T1"> </text:span><text:span text:style-name="T2">(34/6) </text:span> ⲁⲩⲉⲓ ⲛϭⲓ ⲛϩⲁⲗⲁⲧⲉ ⲁⲩⲕⲁⲧϥⲟⲩ ϩⲛⲕⲟⲟⲩⲉ <text:line-break/><text:span text:style-name="T1"> </text:span><text:span text:style-name="T2">(34/7) </text:span> ⲁⲩϩⲉ ⲉϫⲛ ⲧⲡⲉⲧⲣⲁ ⲁⲩⲱ ⲙⲡⲟⲩϫⲉ ⲛⲟⲩⲛⲉ <text:line-break/><text:span text:style-name="T1"> </text:span><text:span text:style-name="T2">(34/8) </text:span> ⲉⲡⲉⲥⲏⲧ’ ⲉⲡⲕⲁϩ ⲁⲩⲱ ⲙⲡⲟⲩⲧⲉⲩⲉ ϩⲙ̅ⲥ̅ ⲉϩ‐ <text:line-break/><text:span text:style-name="T1"> </text:span><text:span text:style-name="T2">(34/9) </text:span> ⲣⲁⲓ̈ ⲉⲧⲡⲉ ⲁⲩⲱ ϩⲛⲕⲟⲟⲩⲉ ⲁⲩϩⲉ ⲉϫⲛ ⲛϣⲟⲛ‐ <text:line-break/><text:span text:style-name="T1"> </text:span><text:span text:style-name="T2">(34/10) </text:span> ⲧⲉ ⲁⲩⲱϭⲧ’ ⲙⲡⲉϭⲣⲟϭ ⲁⲩⲱ ⲁⲡϥⲛⲧ ⲟⲩⲟⲙⲟⲩ <text:line-break/><text:span text:style-name="T1"> </text:span><text:span text:style-name="T2">(34/11) </text:span> ⲁⲩⲱ ⲁϩⲛⲕⲟⲟⲩⲉ ϩⲉ ⲉϫⲛ ⲡⲕⲁϩ ⲉⲧⲛⲁⲛⲟⲩϥ’ <text:line-break/><text:span text:style-name="T1"> </text:span><text:span text:style-name="T2">(34/12) </text:span> ⲁⲩⲱ ⲁϥϯ ⲕⲁⲣⲡⲟⲥ ⲉϩⲣⲁⲓ̈ ⲉⲧⲡⲉ ⲉⲛⲁⲛⲟⲩϥ’ ⲁϥ‐ <text:line-break/><text:span text:style-name="T1"> </text:span><text:span text:style-name="T2">(34/13) </text:span> ⲉⲓ ⲛⲥⲉ ⲉⲥⲟⲧⲉ ⲁⲩⲱ ϣⲉϫⲟⲩⲱⲧ’ ⲉⲥⲟⲧⲉ <text:line-break/><text:span text:style-name="T1"> </text:span><text:span text:style-name="T2">(34/14) </text:span> ⲡⲉϫⲉ ⲓ̅ⲥ̅ ϫⲉ ⲁⲉⲓⲛⲟⲩϫⲉ ⲛⲟⲩⲕⲱϩⲧ’ ⲉϫⲛ <text:line-break/><text:span text:style-name="T1"> </text:span><text:span text:style-name="T2">(34/15) </text:span> ⲡⲕⲟⲥⲙⲟⲥ ⲁⲩⲱ ⲉⲓⲥϩⲏⲏⲧⲉ ϯⲁⲣⲉϩ ⲉⲣⲟϥ’ <text:line-break/><text:span text:style-name="T1"> </text:span><text:span text:style-name="T2">(34/16) </text:span> ϣⲁⲛⲧⲉϥϫⲉⲣⲟ ⲡⲉϫⲉ ⲓ̅ⲥ̅ ϫⲉ ⲧⲉⲉⲓⲡⲉ ⲛⲁⲣⲡⲁ‐ <text:line-break/><text:span text:style-name="T1"> </text:span><text:span text:style-name="T2">(34/17) </text:span> ⲣⲁⲅⲉ ⲁⲩⲱ ⲧⲉⲧⲛⲧⲡⲉ ⲙⲙⲟⲥ ⲛⲁⲣⲡⲁⲣⲁⲅⲉ <text:line-break/><text:span text:style-name="T1"> </text:span><text:span text:style-name="T2">(34/18) </text:span> ⲁⲩⲱ ⲛⲉⲧⲙⲟⲟⲩⲧ ⲥⲉⲟⲛϩ ⲁⲛ ⲁⲩⲱ ⲛⲉⲧⲟⲛϩ <text:line-break/><text:span text:style-name="T1"> </text:span><text:span text:style-name="T2">(34/19) </text:span> ⲥⲉⲛⲁⲙⲟⲩ ⲁⲛ ⲛϩⲟⲟⲩ ⲛⲉⲧⲉⲧⲛⲟⲩⲱⲙ’ <text:line-break/><text:span text:style-name="T1"> </text:span><text:span text:style-name="T2">(34/20) </text:span> ⲙⲡⲉⲧⲙⲟⲟⲩⲧ’ ⲛⲉⲧⲉⲧⲛⲉⲓⲣⲉ ⲙⲙⲟϥ ⲙⲡⲉ‐ <text:line-break/><text:span text:style-name="T1"> </text:span><text:span text:style-name="T2">(34/21) </text:span> ⲧⲟⲛϩ ϩⲟⲧⲁⲛ ⲉⲧⲉⲧⲛϣⲁⲛϣⲱⲡⲉ ϩⲙ ⲡⲟⲩ‐ <text:line-break/><text:span text:style-name="T1"> </text:span><text:span text:style-name="T2">(34/22) </text:span> ⲟⲉⲓⲛ ⲟⲩ ⲡⲉⲧⲉⲧⲛⲁⲁϥ ϩⲙ ⲫⲟⲟⲩ ⲉⲧⲉⲧⲛ‐ <text:line-break/><text:span text:style-name="T1"> </text:span><text:span text:style-name="T2">(34/23) </text:span> ⲟ ⲛⲟⲩⲁ ⲁⲧⲉⲧⲛⲉⲓⲣⲉ ⲙⲡⲥⲛⲁⲩ ϩⲟⲧⲁⲛ ⲇⲉ <text:line-break/><text:span text:style-name="T1"> </text:span><text:span text:style-name="T2">(34/24) </text:span> ⲉⲧⲉⲧⲛϣⲁϣⲱⲡⲉ ⲛⲥⲛⲁⲩ’ ⲟⲩ ⲡⲉ ⲉⲧⲉ‐ <text:line-break/><text:span text:style-name="T1"> </text:span><text:span text:style-name="T2">(34/25) </text:span> ⲧⲛⲛⲁⲁϥ’ ⲡⲉϫⲉ ⲙⲙⲁⲑⲏⲧⲏⲥ ⲛⲓ̅ⲥ̅ ϫⲉ ⲧⲛ‐ <text:line-break/><text:span text:style-name="T1"> </text:span><text:span text:style-name="T2">(34/26) </text:span> ⲥⲟⲟⲩⲛ ϫⲉ ⲕⲛⲁⲃⲱⲕ’ ⲛⲧⲟⲟⲧ̅ⲛ̅ ⲛⲓⲙ’ ⲡⲉ <text:line-break/><text:span text:style-name="T1"> </text:span><text:span text:style-name="T2">(34/27) </text:span> ⲉⲧⲛⲁⲣ ⲛⲟϭ ⲉϩⲣⲁⲓ̈ ⲉϫⲱⲛ ⲡⲉϫⲉ ⲓ̅ⲥ̅ ⲛⲁⲩ <text:line-break/><text:span text:style-name="T1"> </text:span><text:span text:style-name="T2">(34/28) </text:span> ϫⲉ ⲡⲙⲁ ⲛⲧⲁⲧⲉⲧⲛⲉⲓ ⲙⲙⲁⲩ ⲉⲧⲉⲧⲛⲁ‐ <text:line-break/><text:span text:style-name="T1"> </text:span><text:span text:style-name="T2">(34/29) </text:span> ⲃⲱⲕ’ ϣⲁ ⲓ̈ⲁⲕⲱⲃⲟⲥ ⲡⲇⲓⲕⲁⲓⲟⲥ ⲡⲁⲉⲓ ⲛⲧⲁ <text:line-break/><text:span text:style-name="T1"> </text:span><text:span text:style-name="T2">(34/30) </text:span> ⲧⲡⲉ ⲙⲛ ⲡⲕⲁϩ ϣⲱⲡⲉ ⲉⲧⲃⲏⲧϥ ⲡⲉϫⲉ ⲓ̅ⲥ̅ <text:line-break/><text:span text:style-name="T1"> </text:span><text:span text:style-name="T2">(34/31) </text:span> ⲛⲛⲉϥⲙⲁⲑⲏⲧⲏⲥ ϫⲉ ⲧⲛⲧⲱⲛⲧ’ ⲛⲧⲉⲧⲛ‐ <text:line-break/><text:span text:style-name="T1"> </text:span><text:span text:style-name="T2">(34/32) </text:span> ϫⲟⲟⲥ ⲛⲁⲉⲓ ϫⲉ ⲉⲉⲓⲛⲉ ⲛⲛⲓⲙ ⲡⲉϫⲁϥ ⲛⲁϥ’ <text:line-break/><text:span text:style-name="T1"> </text:span><text:span text:style-name="T2">(34/33) </text:span> ⲛϭⲓ ⲥⲓⲙⲱⲛ ⲡⲉⲧⲣⲟⲥ ϫⲉ ⲉⲕⲉⲓⲛⲉ ⲛⲟⲩⲁⲅ’‐ <text:line-break/><text:span text:style-name="T1"> </text:span><text:span text:style-name="T2">(34/34) </text:span> ⲅ̣ⲉⲗⲟⲥ ⲛⲇⲓⲕⲁⲓⲟⲥ ⲡⲉϫⲁϥ ⲛⲁϥ ⲛϭⲓ ⲙⲁⲑ’‐ <text:line-break/><text:span text:style-name="T1"> </text:span><text:span text:style-name="T2">(35/1) </text:span> ⲑⲁⲓⲟⲥ ϫⲉ ⲉⲕⲉⲓⲛⲉ ⲛⲟⲩ̣ⲣⲱⲙⲉ ⲙⲫⲓⲗⲟⲥⲟ‐ <text:line-break/><text:span text:style-name="T1"> </text:span><text:span text:style-name="T2">(35/2) </text:span> ⲫⲟⲥ ⲛⲣⲙⲛϩⲏⲧ’ ⲡⲉϫⲁϥ ⲛⲁϥ ⲛϭⲓ ⲑⲱⲙⲁⲥ <text:line-break/><text:span text:style-name="T1"> </text:span><text:span text:style-name="T2">(35/3) </text:span> ϫⲉ ⲡⲥⲁϩ ϩⲟⲗⲱⲥ ⲧⲁⲧⲁⲡⲣⲟ ⲛⲁϣ〈ϣ〉ⲁⲡϥ’ ⲁⲛ <text:line-break/><text:span text:style-name="T1"> </text:span><text:span text:style-name="T2">(35/4) </text:span> ⲉⲧⲣⲁϫⲟⲟⲥ ϫⲉ ⲉⲕⲉⲓⲛⲉ ⲛⲛⲓⲙ’ ⲡⲉϫⲉ ⲓⲏ̅ⲥ̅ <text:line-break/><text:span text:style-name="T1"> </text:span><text:span text:style-name="T2">(35/5) </text:span> ϫⲉ ⲁⲛⲟⲕ’ ⲡⲉⲕ’ⲥⲁϩ ⲁⲛ ⲉⲡⲉⲓ ⲁⲕⲥⲱ ⲁⲕϯϩⲉ <text:line-break/><text:span text:style-name="T1"> </text:span><text:span text:style-name="T2">(35/6) </text:span> ⲉⲃⲟⲗ ϩⲛ ⲧⲡⲏⲅⲏ ⲉⲧⲃⲣⲃⲣⲉ ⲧⲁⲉⲓ ⲁⲛⲟⲕ’ <text:line-break/><text:soft-page-break/><text:span text:style-name="T1"> </text:span><text:span text:style-name="T2">(35/7) </text:span> ⲛⲧⲁⲉⲓϣⲓⲧⲥ ⲁⲩⲱ ⲁϥϫⲓⲧϥ ⲁϥⲁⲛⲁⲭⲱⲣⲉⲓ <text:line-break/><text:span text:style-name="T1"> </text:span><text:span text:style-name="T2">(35/8) </text:span> ⲁϥϫⲱ ⲛⲁϥ ⲛϣⲟⲙⲧ’ ⲛϣⲁϫⲉ ⲛⲧⲁⲣⲉ ⲑⲱ‐ <text:line-break/><text:span text:style-name="T1"> </text:span><text:span text:style-name="T2">(35/9) </text:span> ⲙⲁⲥ ⲇⲉ ⲉⲓ ϣⲁ ⲛⲉϥ’ϣⲃⲉⲉⲣ’ ⲁⲩϫⲛⲟⲩϥ’ ϫⲉ <text:line-break/><text:span text:style-name="T1"> </text:span><text:span text:style-name="T2">(35/10) </text:span> ⲛⲧⲁ ⲓ̅ⲥ̅ ϫⲟⲟⲥ ϫⲉ ⲟⲩ ⲛⲁⲕ’ ⲡⲉϫⲁϥ’ ⲛⲁⲩ ⲛϭⲓ <text:line-break/><text:span text:style-name="T1"> </text:span><text:span text:style-name="T2">(35/11) </text:span> ⲑⲱⲙⲁⲥ ϫⲉ ⲉⲓϣⲁⲛ’ϫⲱ ⲛⲏⲧⲛ ⲟⲩⲁ ϩⲛ ⲛϣⲁ‐ <text:line-break/><text:span text:style-name="T1"> </text:span><text:span text:style-name="T2">(35/12) </text:span> ϫⲉ ⲛⲧⲁϥϫⲟⲟⲩ ⲛⲁⲉⲓ ⲧⲉⲧⲛⲁϥⲓ ⲱⲛⲉ ⲛⲧⲉ‐ <text:line-break/><text:span text:style-name="T1"> </text:span><text:span text:style-name="T2">(35/13) </text:span> ⲧⲛⲛⲟⲩϫⲉ ⲉⲣⲟⲉⲓ ⲁⲩⲱ ⲛⲧⲉ ⲟⲩⲕⲱϩⲧ’ ⲉⲓ ⲉ‐ <text:line-break/><text:span text:style-name="T1"> </text:span><text:span text:style-name="T2">(35/14) </text:span> ⲃⲟⲗ ϩⲛ ⲛⲱⲛⲉ † ⲛⲥⲣⲱϩⲕ’ ⲙⲙⲱⲧⲛ ⲡⲉϫⲉ <text:line-break/><text:span text:style-name="T1"> </text:span><text:span text:style-name="T2">(35/15) </text:span> ⲓ̅ⲥ̅ ⲛⲁⲩ ϫⲉ ⲉⲧⲉⲧⲛϣⲁⲛⲣⲛⲏⲥⲧⲉⲩⲉ ⲧⲉⲧⲛⲁ‐ <text:line-break/><text:span text:style-name="T1"> </text:span><text:span text:style-name="T2">(35/16) </text:span> ϫⲡⲟ ⲛⲏⲧⲛ ⲛⲛⲟⲩⲛⲟⲃⲉ ⲁⲩⲱ ⲉⲧⲉⲧⲛϣⲁⲛ‐ <text:line-break/><text:span text:style-name="T1"> </text:span><text:span text:style-name="T2">(35/17) </text:span> ϣⲗⲏⲗ’ ⲥⲉⲛⲁⲣⲕⲁⲧⲁⲕⲣⲓⲛⲉ ⲙⲙⲱⲧⲛ ⲁⲩⲱ <text:line-break/><text:span text:style-name="T1"> </text:span><text:span text:style-name="T2">(35/18) </text:span> ⲉⲧⲉⲧⲛϣⲁⲛϯ ⲉⲗⲉⲏⲙⲟⲥⲩⲛⲏ ⲉⲧⲉⲧⲛⲁⲉⲓ‐ <text:line-break/><text:span text:style-name="T1"> </text:span><text:span text:style-name="T2">(35/19) </text:span> ⲣⲉ ⲛⲟⲩⲕⲁⲕⲟⲛ ⲛⲛⲉⲧⲙⲡ̅ⲛ̅ⲁ̅ ⲁⲩⲱ ⲉⲧⲉⲧⲛ‐ <text:line-break/><text:span text:style-name="T1"> </text:span><text:span text:style-name="T2">(35/20) </text:span> ϣⲁⲛⲃⲱⲕ’ ⲉϩⲟⲩⲛ ⲉⲕⲁϩ ⲛⲓⲙ ⲁⲩⲱ ⲛⲧⲉⲧⲙ‐ <text:line-break/><text:span text:style-name="T1"> </text:span><text:span text:style-name="T2">(35/21) </text:span> ⲙⲟⲟϣⲉ ϩⲛ ⲛⲭⲱⲣⲁ ⲉⲩϣⲁⲣⲡⲁⲣⲁⲇⲉⲭⲉ <text:line-break/><text:span text:style-name="T1"> </text:span><text:span text:style-name="T2">(35/22) </text:span> ⲙⲙⲱⲧⲛ ⲡⲉⲧⲟⲩⲛⲁⲕⲁⲁϥ ϩⲁⲣⲱⲧⲛ ⲟⲩⲟⲙϥ <text:line-break/><text:span text:style-name="T1"> </text:span><text:span text:style-name="T2">(35/23) </text:span> ⲛⲉⲧϣⲱⲛⲉ ⲛϩⲏⲧⲟⲩ ⲉⲣⲓⲑⲉⲣⲁⲡⲉⲩⲉ ⲙⲙⲟ‐ <text:line-break/><text:span text:style-name="T1"> </text:span><text:span text:style-name="T2">(35/24) </text:span> ⲟⲩ ⲡⲉⲧⲛⲁⲃⲱⲕ ⲅⲁⲣ’ ⲉϩⲟⲩⲛ ϩⲛ ⲧⲉⲧⲛⲧⲁ‐ <text:line-break/><text:span text:style-name="T1"> </text:span><text:span text:style-name="T2">(35/25) </text:span> ⲡⲣⲟ ϥⲛⲁϫⲱϩⲙ ⲧⲏⲩⲧⲛ ⲁⲛ’ ⲁⲗⲗⲁ ⲡⲉⲧⲛ‐ <text:line-break/><text:span text:style-name="T1"> </text:span><text:span text:style-name="T2">(35/26) </text:span> ⲛⲏⲩ ⲉⲃⲟⲗ’ ϩⲛ ⲧⲉⲧⲛⲧⲁⲡⲣⲟ ⲛⲧⲟϥ ⲡⲉ‐ <text:line-break/><text:span text:style-name="T1"> </text:span><text:span text:style-name="T2">(35/27) </text:span> ⲧⲛⲁϫⲁϩⲙ ⲧⲏⲩⲧⲛ ⲡⲉϫⲉ ⲓ̅ⲥ̅ ϫⲉ ϩⲟⲧⲁⲛ <text:line-break/><text:span text:style-name="T1"> </text:span><text:span text:style-name="T2">(35/28) </text:span> ⲉⲧⲉⲧⲛϣⲁⲛⲛⲁⲩ ⲉⲡⲉⲧⲉ ⲙⲡⲟⲩϫⲡⲟϥ’ <text:line-break/><text:span text:style-name="T1"> </text:span><text:span text:style-name="T2">(35/29) </text:span> ⲉⲃⲟⲗ ϩⲛ ⲧⲥϩⲓⲙⲉ ⲡⲉϩⲧ’ ⲧⲏⲩⲧⲛ ⲉϫⲙ <text:line-break/><text:span text:style-name="T1"> </text:span><text:span text:style-name="T2">(35/30) </text:span> ⲡⲉⲧⲛϩⲟ ⲛⲧⲉⲧⲛⲟⲩⲱϣⲧ ⲛⲁϥ’ ⲡⲉⲧⲙ‐ <text:line-break/><text:span text:style-name="T1"> </text:span><text:span text:style-name="T2">(35/31) </text:span> ⲙⲁⲩ ⲡⲉ ⲡⲉⲧⲛⲉⲓⲱⲧ’ ⲡⲉϫⲉ ⲓ̅ⲥ̅ ϫⲉ ⲧⲁⲭⲁ <text:line-break/><text:span text:style-name="T1"> </text:span><text:span text:style-name="T2">(35/32) </text:span> ⲉⲩⲙⲉⲉⲩⲉ ⲛϭⲓ ⲣⲣⲱⲙⲉ ϫⲉ ⲛⲧⲁⲉⲓⲉⲓ ⲉⲛⲟⲩ‐ <text:line-break/><text:span text:style-name="T1"> </text:span><text:span text:style-name="T2">(35/33) </text:span> ϫⲉ ⲛⲟⲩⲉⲓⲣⲏⲛⲏ ⲉϫⲙ ⲡⲕⲟⲥⲙⲟⲥ ⲁⲩⲱ <text:line-break/><text:span text:style-name="T1"> </text:span><text:span text:style-name="T2">(35/34) </text:span> ⲥⲉⲥⲟⲟⲩⲛ ⲁⲛ ϫⲉ ⲛⲧⲁⲉⲓⲉⲓ ⲁⲛⲟⲩϫⲉ ⲛϩⲛ‐ <text:line-break/><text:span text:style-name="T1"> </text:span><text:span text:style-name="T2">(35/35) </text:span> ⲡⲱⲣϫ’ ⲉϫⲛ ⲡⲕⲁϩ ⲟⲩⲕⲱϩⲧ’ ⲟⲩⲥⲏϥⲉ’ <text:line-break/><text:span text:style-name="T1"> </text:span><text:span text:style-name="T2">(35/36) </text:span> ⲟⲩⲡⲟⲗⲉⲙⲟⲥ ⲟⲩⲛ ϯⲟⲩ ⲅⲁⲣ ⲛⲁϣ̣ⲱ̣ⲡ̣ⲉ̣ <text:line-break/><text:span text:style-name="T1"> </text:span><text:span text:style-name="T2">(36/1) </text:span> ϩⲛ ⲟⲩⲏⲉⲓ ⲟⲩⲛ ϣⲟⲙⲧ ⲛⲁϣⲱⲡⲉ ⲉϫⲛ <text:line-break/><text:span text:style-name="T1"> </text:span><text:span text:style-name="T2">(36/2) </text:span> ⲥⲛⲁⲩ ⲁⲩⲱ ⲥⲛⲁⲩ ⲉϫⲛ ϣⲟⲙⲧ’ ⲡⲉⲓⲱⲧ’ <text:line-break/><text:span text:style-name="T1"> </text:span><text:span text:style-name="T2">(36/3) </text:span> ⲉϫⲙ ⲡϣⲏⲣⲉ ⲁⲩⲱ ⲡϣⲏⲣⲉ ⲉϫⲙ ⲡⲉⲓⲱⲧ’ <text:line-break/><text:span text:style-name="T1"> </text:span><text:span text:style-name="T2">(36/4) </text:span> ⲁⲩⲱ ⲥⲉⲛⲁⲱϩⲉ ⲉⲣⲁⲧⲟⲩ ⲉⲩⲟ ⲙⲙⲟⲛⲁ‐ <text:line-break/><text:span text:style-name="T1"> </text:span><text:span text:style-name="T2">(36/5) </text:span> ⲭⲟⲥ ⲡⲉϫⲉ ⲓ̅ⲥ̅ ϫⲉ ϯⲛⲁϯ ⲛⲏⲧⲛ ⲙⲡⲉⲧⲉ <text:line-break/><text:span text:style-name="T1"> </text:span><text:span text:style-name="T2">(36/6) </text:span> ⲙⲡⲉ ⲃⲁⲗ ⲛⲁⲩ ⲉⲣⲟϥ’ ⲁⲩⲱ ⲡⲉⲧⲉ ⲙⲡⲉ ⲙⲁ‐ <text:line-break/><text:span text:style-name="T1"> </text:span><text:span text:style-name="T2">(36/7) </text:span> ⲁϫⲉ ⲥⲟⲧⲙⲉϥ’ ⲁⲩⲱ ⲡⲉⲧⲉ ⲙⲡⲉ ϭⲓϫ’ ϭⲙ‐ <text:line-break/><text:span text:style-name="T1"> </text:span><text:span text:style-name="T2">(36/8) </text:span> ϭⲱⲙϥ’ ⲁⲩⲱ ⲙⲡⲉϥ’ⲉⲓ ⲉϩⲣⲁⲓ̈ ϩⲓ ⲫⲏⲧ’ <text:line-break/><text:span text:style-name="T1"> </text:span><text:span text:style-name="T2">(36/9) </text:span> ⲣⲣⲱⲙⲉ ⲡⲉϫⲉ ⲙⲙⲁⲑⲏⲧⲏⲥ ⲛⲓ̅ⲥ̅ ϫⲉ ϫⲟ‐ <text:line-break/><text:span text:style-name="T1"> </text:span><text:span text:style-name="T2">(36/10) </text:span> ⲟⲥ ⲉⲣⲟⲛ ϫⲉ ⲧⲛϩⲁⲏ ⲉⲥⲛⲁϣⲱⲡⲉ ⲛ‐ <text:line-break/><text:span text:style-name="T1"> </text:span><text:span text:style-name="T2">(36/11) </text:span> ⲁϣ ⲛϩⲉ ⲡⲉϫⲉ ⲓ̅ⲥ̅ ⲁⲧⲉⲧⲛϭⲱⲗⲡ’ ⲅⲁⲣ ⲉⲃⲟⲗ <text:line-break/><text:span text:style-name="T1"> </text:span><text:span text:style-name="T2">(36/12) </text:span> ⲛⲧⲁⲣⲭⲏ ϫⲉⲕⲁⲁⲥ ⲉⲧⲉⲧⲛⲁϣⲓⲛⲉ ⲛⲥⲁ <text:line-break/><text:span text:style-name="T1"> </text:span><text:span text:style-name="T2">(36/13) </text:span> ⲑⲁϩⲏ ϫⲉ ϩⲙ ⲡⲙⲁ ⲉⲧⲉ ⲧⲁⲣⲭⲏ ⲙⲙⲁⲩ ⲉ‐ <text:line-break/><text:span text:style-name="T1"> </text:span><text:span text:style-name="T2">(36/14) </text:span> ⲑⲁϩⲏ ⲛⲁϣⲱⲡⲉ ⲙⲙⲁⲩ ⲟⲩⲙⲁⲕⲁⲣⲓⲟⲥ <text:line-break/><text:span text:style-name="T1"> </text:span><text:span text:style-name="T2">(36/15) </text:span> ⲡⲉⲧⲛⲁ⟦ϩ⟧ⲱϩⲉ ⲉⲣⲁⲧϥ’ ϩⲛ ⲧⲁⲣⲭⲏ ⲁⲩⲱ <text:line-break/><text:span text:style-name="T1"> </text:span><text:span text:style-name="T2">(36/16) </text:span> ϥⲛⲁⲥⲟⲩⲱⲛ ⲑϩⲁⲏ ⲁⲩⲱ ϥⲛⲁϫⲓ ϯⲡⲉ <text:line-break/><text:span text:style-name="T1"> </text:span><text:span text:style-name="T2">(36/17) </text:span> ⲁⲛ ⲙⲙⲟⲩ ⲡⲉϫⲉ ⲓ̅ⲥ̅ ϫⲉ ⲟⲩⲙⲁⲕⲁⲣⲓⲟⲥ <text:line-break/><text:soft-page-break/><text:span text:style-name="T1"> </text:span><text:span text:style-name="T2">(36/18) </text:span> ⲡⲉ ⲛⲧⲁϩϣⲱⲡⲉ ϩⲁ ⲧⲉϩⲏ ⲉⲙⲡⲁⲧⲉϥϣⲱ‐ <text:line-break/><text:span text:style-name="T1"> </text:span><text:span text:style-name="T2">(36/19) </text:span> ⲡⲉ ⲉⲧⲉⲧⲛϣⲁⲛϣⲱⲡⲉ ⲛⲁⲉⲓ ⲙⲙⲁⲑⲏ‐ <text:line-break/><text:span text:style-name="T1"> </text:span><text:span text:style-name="T2">(36/20) </text:span> ⲧⲏⲥ ⲛⲧⲉⲧⲛⲥⲱⲧⲙ ⲁⲛⲁϣⲁϫⲉ ⲛⲉⲉⲓⲱ‐ <text:line-break/><text:span text:style-name="T1"> </text:span><text:span text:style-name="T2">(36/21) </text:span> ⲛⲉ ⲛⲁⲣⲇⲓⲁⲕⲟⲛⲉⲓ ⲛⲏⲧⲛ ⲟⲩⲛⲧⲏⲧⲛ <text:line-break/><text:span text:style-name="T1"> </text:span><text:span text:style-name="T2">(36/22) </text:span> ⲅⲁⲣ’ ⲙⲙⲁⲩ ⲛϯⲟⲩ ⲛϣⲏⲛ ϩⲙ ⲡⲁⲣⲁ’‐ <text:line-break/><text:span text:style-name="T1"> </text:span><text:span text:style-name="T2">(36/23) </text:span> ⲇⲓⲥⲟⲥ ⲉⲥⲉⲕⲓⲙ ⲁⲛ ⲛϣⲱⲙ ⲙⲡⲣⲱ <text:line-break/><text:span text:style-name="T1"> </text:span><text:span text:style-name="T2">(36/24) </text:span> ⲁⲩⲱ ⲙⲁⲣⲉ ⲛⲟⲩϭⲱⲃⲉ ϩⲉ ⲉⲃⲟⲗ ⲡⲉⲧ’‐ <text:line-break/><text:span text:style-name="T1"> </text:span><text:span text:style-name="T2">(36/25) </text:span> ⲛⲁⲥⲟⲩⲱⲛⲟⲩ ϥⲛⲁϫⲓ ϯⲡⲉ ⲁⲛ’ ⲙⲙⲟⲩ <text:line-break/><text:span text:style-name="T1"> </text:span><text:span text:style-name="T2">(36/26) </text:span> ⲡⲉϫⲉ ⲙⲙⲁⲑⲏⲧⲏⲥ ⲛⲓ̅ⲥ̅ ϫⲉ ϫⲟⲟⲥ <text:line-break/><text:span text:style-name="T1"> </text:span><text:span text:style-name="T2">(36/27) </text:span> ⲉⲣⲟⲛ ϫⲉ ⲧⲙⲛⲧⲉⲣⲟ ⲛⲙⲡⲏⲩⲉ ⲉⲥ‐ <text:line-break/><text:span text:style-name="T1"> </text:span><text:span text:style-name="T2">(36/28) </text:span> ⲧⲛⲧⲱⲛ ⲉⲛⲓⲙ ⲡⲉϫⲁϥ ⲛⲁⲩ ϫⲉ ⲉⲥⲧⲛ‐ <text:line-break/><text:span text:style-name="T1"> </text:span><text:span text:style-name="T2">(36/29) </text:span> ⲧⲱⲛ ⲁⲩⲃⲗⲃⲓⲗⲉ ⲛϣⲗⲧⲁⲙ 〈ⲥ〉ⲥⲟⲃ̅ⲕ̅ ⲡⲁ‐ <text:line-break/><text:span text:style-name="T1"> </text:span><text:span text:style-name="T2">(36/30) </text:span> ⲣⲁ ⲛϭⲣⲟϭ ⲧⲏⲣⲟⲩ ϩⲟⲧⲁⲛ ⲇⲉ ⲉⲥϣⲁⲛ‐ <text:line-break/><text:span text:style-name="T1"> </text:span><text:span text:style-name="T2">(36/31) </text:span> ϩⲉ ⲉϫⲙ ⲡⲕⲁϩ ⲉⲧⲟⲩⲣ ϩⲱⲃ ⲉⲣⲟϥ ϣⲁϥ‐ <text:line-break/><text:span text:style-name="T1"> </text:span><text:span text:style-name="T2">(36/32) </text:span> ⲧⲉⲩⲟ ⲉⲃⲟⲗ ⲛⲛⲟⲩⲛⲟϭ ⲛⲧⲁⲣ ⲛϥϣⲱ‐ <text:line-break/><text:span text:style-name="T1"> </text:span><text:span text:style-name="T2">(36/33) </text:span> ⲡⲉ ⲛⲥⲕⲉⲡⲏ ⲛϩⲁⲗⲁⲧⲉ ⲛⲧⲡⲉ ⲡⲉ‐ <text:line-break/><text:span text:style-name="T1"> </text:span><text:span text:style-name="T2">(36/34) </text:span> ϫⲉ ⲙⲁⲣⲓϩⲁⲙ ⲛⲓ̅ⲥ̅ ϫⲉ ⲉⲛⲉⲕⲙⲁⲑⲏ‐ <text:line-break/><text:span text:style-name="T1"> </text:span><text:span text:style-name="T2">(36/35) </text:span> ⲧ̣ⲏⲥ ⲉⲓⲛⲉ ⲛⲛⲓⲙ’ ⲡⲉϫⲁϥ’ ϫⲉ ⲉⲩⲉⲓⲛⲉ <text:line-break/><text:span text:style-name="T1"> </text:span><text:span text:style-name="T2">(37/1) </text:span> ⲛϩⲛϣⲏⲣⲉ ϣⲏⲙ’ ⲉⲩϭⲉⲗⲓⲧ’ ⲁⲩⲥⲱϣⲉ ⲉⲧⲱ‐ <text:line-break/><text:span text:style-name="T1"> </text:span><text:span text:style-name="T2">(37/2) </text:span> ⲟⲩ ⲁⲛ ⲧⲉ ϩⲟⲧⲁⲛ ⲉⲩϣⲁⲉⲓ ⲛϭⲓ ⲛϫⲟⲉⲓⲥ <text:line-break/><text:span text:style-name="T1"> </text:span><text:span text:style-name="T2">(37/3) </text:span> ⲛⲧⲥⲱϣⲉ ⲥⲉⲛⲁϫⲟⲟⲥ ϫⲉ ⲕⲉ ⲧⲛⲥⲱϣⲉ <text:line-break/><text:span text:style-name="T1"> </text:span><text:span text:style-name="T2">(37/4) </text:span> ⲉⲃⲟⲗ ⲛⲁⲛ ⲛⲧⲟⲟⲩ ⲥⲉⲕⲁⲕⲁϩⲏⲩ ⲙⲡⲟⲩⲙ‐ <text:line-break/><text:span text:style-name="T1"> </text:span><text:span text:style-name="T2">(37/5) </text:span> ⲧⲟ ⲉⲃⲟⲗ ⲉⲧⲣⲟⲩⲕⲁⲁⲥ ⲉⲃⲟⲗ ⲛⲁⲩ ⲛⲥⲉϯ ⲧⲟⲩ‐ <text:line-break/><text:span text:style-name="T1"> </text:span><text:span text:style-name="T2">(37/6) </text:span> ⲥⲱϣⲉ ⲛⲁⲩ ⲇⲓⲁ ⲧⲟⲩⲧⲟ ϯϫⲱ ⲙⲙⲟⲥ ϫⲉ ⲉϥ’‐ <text:line-break/><text:span text:style-name="T1"> </text:span><text:span text:style-name="T2">(37/7) </text:span> ϣⲁⲉⲓⲙⲉ ⲛϭⲓ ⲡϫⲉⲥϩⲛⲏⲉⲓ ϫⲉ ϥⲛⲏⲩ ⲛϭⲓ <text:line-break/><text:span text:style-name="T1"> </text:span><text:span text:style-name="T2">(37/8) </text:span> ⲡⲣⲉϥϫⲓⲟⲩⲉ ϥⲛⲁⲣⲟⲉⲓⲥ ⲉⲙⲡⲁⲧⲉϥ’ⲉⲓ ⲛϥⲧⲙ‐ <text:line-break/><text:span text:style-name="T1"> </text:span><text:span text:style-name="T2">(37/9) </text:span> ⲕⲁⲁϥ’ ⲉϣⲟϫⲧ’ ⲉϩⲟⲩⲛ ⲉⲡⲉϥⲏⲉⲓ ⲛⲧⲉ ⲧⲉϥ’‐ <text:line-break/><text:span text:style-name="T1"> </text:span><text:span text:style-name="T2">(37/10) </text:span> ⲙⲛⲧⲉⲣⲟ ⲉⲧⲣⲉϥϥⲓ ⲛⲛⲉϥ’ⲥⲕⲉⲩⲟⲥ ⲛⲧⲱⲧⲛ <text:line-break/><text:span text:style-name="T1"> </text:span><text:span text:style-name="T2">(37/11) </text:span> ⲇⲉ ⲣⲟⲉⲓⲥ ϩⲁ ⲧⲉϩⲏ ⲙⲡⲕⲟⲥⲙⲟⲥ ⲙⲟⲩⲣ’ ⲙ‐ <text:line-break/><text:span text:style-name="T1"> </text:span><text:span text:style-name="T2">(37/12) </text:span> ⲙⲱⲧⲛ ⲉϫⲛ ⲛⲉⲧⲛϯⲡⲉ ϩⲛⲛⲟⲩⲛⲟϭ ⲛⲇⲩ‐ <text:line-break/><text:span text:style-name="T1"> </text:span><text:span text:style-name="T2">(37/13) </text:span> ⲛⲁⲙⲓⲥ ϣⲓⲛⲁ ϫⲉ ⲛⲉ ⲛⲗⲏⲥⲧⲏⲥ ϩⲉ ⲉϩⲓⲏ ⲉⲉⲓ <text:line-break/><text:span text:style-name="T1"> </text:span><text:span text:style-name="T2">(37/14) </text:span> ϣⲁⲣⲱⲧⲛ ⲉⲡⲉⲓ ⲧⲉⲭⲣⲉⲓⲁ ⲉⲧⲉⲧⲛϭⲱϣⲧ’ <text:line-break/><text:span text:style-name="T1"> </text:span><text:span text:style-name="T2">(37/15) </text:span> ⲉⲃⲟⲗ ϩⲏⲧⲥ ⲥⲉⲛⲁϩⲉ’ ⲉⲣⲟⲥ ⲙⲁⲣⲉϥϣⲱⲡⲉ <text:line-break/><text:span text:style-name="T1"> </text:span><text:span text:style-name="T2">(37/16) </text:span> ϩⲛ ⲧⲉⲧⲛⲙⲏⲧⲉ ⲛϭⲓ ⲟⲩⲣⲱⲙⲉ ⲛⲉⲡⲓⲥⲧⲏ‐ <text:line-break/><text:span text:style-name="T1"> </text:span><text:span text:style-name="T2">(37/17) </text:span> ⲙⲱⲛ ⲛⲧⲁⲣⲉ ⲡⲕⲁⲣⲡⲟⲥ ⲡⲱϩ ⲁϥⲉⲓ ϩⲛⲛⲟⲩ‐ <text:line-break/><text:span text:style-name="T1"> </text:span><text:span text:style-name="T2">(37/18) </text:span> ϭⲉⲡⲏ ⲉⲡⲉϥⲁⲥϩ ϩⲛ ⲧⲉϥϭⲓϫ ⲁϥϩⲁⲥϥ ⲡⲉ‐ <text:line-break/><text:span text:style-name="T1"> </text:span><text:span text:style-name="T2">(37/19) </text:span> ⲧⲉ ⲟⲩⲛ ⲙⲁⲁϫⲉ ⲙⲙⲟϥ’ ⲉⲥⲱⲧⲙ ⲙⲁⲣⲉϥⲥⲱⲧⲙ <text:line-break/><text:span text:style-name="T1"> </text:span><text:span text:style-name="T2">(37/20) </text:span> ⲁⲓ̅ⲥ̅ ⲛⲁⲩ ⲁϩⲛⲕⲟⲩⲉⲓ ⲉⲩϫⲓ ⲉⲣⲱⲧⲉ ⲡⲉϫⲁϥ ⲛ‐ <text:line-break/><text:span text:style-name="T1"> </text:span><text:span text:style-name="T2">(37/21) </text:span> ⲛⲉϥⲙⲁⲑⲏⲧⲏⲥ ϫⲉ ⲛⲉⲉⲓⲕⲟⲩⲉⲓ ⲉⲧϫⲓ ⲉⲣⲱ‐ <text:line-break/><text:span text:style-name="T1"> </text:span><text:span text:style-name="T2">(37/22) </text:span> ⲧⲉ ⲉⲩⲧⲛⲧⲱⲛ ⲁⲛⲉⲧⲃⲏⲕ’ ⲉϩⲟⲩⲛ ⲁⲧⲙⲛ‐ <text:line-break/><text:span text:style-name="T1"> </text:span><text:span text:style-name="T2">(37/23) </text:span> ⲧⲉⲣⲟ ⲡⲉϫⲁⲩ ⲛⲁϥ’ ϫⲉ ⲉⲉⲓⲉⲛⲟ ⲛⲕⲟⲩⲉⲓ ⲧⲛ‐ <text:line-break/><text:span text:style-name="T1"> </text:span><text:span text:style-name="T2">(37/24) </text:span> ⲛⲁⲃⲱⲕ’ ⲉϩⲟⲩⲛ ⲉⲧⲙⲛⲧⲉⲣⲟ ⲡⲉϫⲉ ⲓⲏ̅ⲥ̅ ⲛⲁⲩ <text:line-break/><text:span text:style-name="T1"> </text:span><text:span text:style-name="T2">(37/25) </text:span> ϫⲉ ϩⲟⲧⲁⲛ ⲉⲧⲉⲧⲛϣⲁⲣ ⲡⲥⲛⲁⲩ ⲟⲩⲁ ⲁⲩⲱ ⲉ‐ <text:line-break/><text:span text:style-name="T1"> </text:span><text:span text:style-name="T2">(37/26) </text:span> ⲧⲉⲧⲛϣⲁⲣ ⲡⲥⲁ ⲛϩⲟⲩⲛ ⲛⲑⲉ ⲙⲡⲥⲁ ⲛⲃⲟⲗ <text:line-break/><text:span text:style-name="T1"> </text:span><text:span text:style-name="T2">(37/27) </text:span> ⲁⲩⲱ ⲡⲥⲁ ⲛⲃⲟⲗ ⲛⲑⲉ ⲙⲡⲥⲁ ⲛϩⲟⲩⲛ ⲁⲩⲱ ⲡⲥⲁ ⲛ‐ <text:line-break/><text:span text:style-name="T1"> </text:span><text:span text:style-name="T2">(37/28) </text:span> ⲧⲡⲉ ⲛⲑⲉ ⲙⲡⲥⲁ ⲙⲡⲓⲧⲛ ⲁⲩⲱ ϣⲓⲛⲁ ⲉⲧⲉ‐ <text:line-break/><text:span text:style-name="T1"> </text:span><text:span text:style-name="T2">(37/29) </text:span> ⲧⲛⲁⲉⲓⲣⲉ ⲙⲫⲟ’ⲟⲩⲧ’ ⲙⲛ ⲧⲥϩⲓⲙⲉ ⲙⲡⲓⲟⲩⲁ <text:line-break/><text:soft-page-break/><text:span text:style-name="T1"> </text:span><text:span text:style-name="T2">(37/30) </text:span> ⲟⲩⲱⲧ’ ϫⲉⲕⲁⲁⲥ ⲛⲉ ⲫⲟⲟⲩⲧ’ ⲣ ϩⲟⲟⲩⲧ’ ⲛⲧⲉ <text:line-break/><text:span text:style-name="T1"> </text:span><text:span text:style-name="T2">(37/31) </text:span> ⲧⲥϩⲓⲙⲉ ⲣ ⲥϩⲓⲙⲉ ϩⲟⲧⲁⲛ ⲉⲧⲉⲧⲛϣⲁⲉⲓⲣⲉ <text:line-break/><text:span text:style-name="T1"> </text:span><text:span text:style-name="T2">(37/32) </text:span> ⲛϩⲛⲃⲁⲗ ⲉⲡⲙⲁ ⲛⲟⲩⲃⲁⲗ’ ⲁⲩⲱ ⲟⲩϭⲓϫ’ <text:line-break/><text:span text:style-name="T1"> </text:span><text:span text:style-name="T2">(37/33) </text:span> ⲉⲡⲙⲁ ⲛⲛⲟⲩϭⲓϫ’ ⲁⲩⲱ ⲟⲩⲉⲣⲏⲧⲉ ⲉⲡⲙⲁ <text:line-break/><text:span text:style-name="T1"> </text:span><text:span text:style-name="T2">(37/34) </text:span> ⲛⲟⲩⲉⲣⲏⲧⲉ ⲟⲩϩⲓⲕⲱⲛ’ ⲉⲡⲙⲁ ⲛⲟⲩϩⲓⲕⲱⲛ <text:line-break/><text:span text:style-name="T1"> </text:span><text:span text:style-name="T2">(37/35) </text:span> ⲧⲟⲧⲉ ⲧⲉⲧⲛⲁⲃⲱⲕ’ ⲉϩⲟⲩⲛ ⲉ̣[ⲧ]ⲙ̣ⲛ̣[ⲧⲉⲣ]ⲟ’ <text:line-break/><text:span text:style-name="T1"> </text:span><text:span text:style-name="T2">(38/1) </text:span> ⲡⲉϫⲉ ⲓ̅ⲥ̅ ϫⲉ ϯⲛⲁⲥⲉⲧ̣ⲡ ⲧⲏⲛⲉ ⲟⲩⲁ ⲉⲃⲟⲗ <text:line-break/><text:span text:style-name="T1"> </text:span><text:span text:style-name="T2">(38/2) </text:span> ϩⲛ ϣⲟ ⲁⲩⲱ ⲥⲛⲁⲩ ⲉⲃⲟⲗ ϩⲛ ⲧⲃⲁ ⲁⲩⲱ <text:line-break/><text:span text:style-name="T1"> </text:span><text:span text:style-name="T2">(38/3) </text:span> ⲥⲉⲛⲁⲱϩⲉ ⲉⲣⲁⲧⲟⲩ ⲉⲩⲟ ⲟⲩⲁ ⲟⲩⲱⲧ’ ⲡⲉ‐ <text:line-break/><text:span text:style-name="T1"> </text:span><text:span text:style-name="T2">(38/4) </text:span> ϫⲉ ⲛⲉϥⲙⲁⲑⲏⲧⲏⲥ ϫⲉ ⲙⲁⲧⲥⲉⲃⲟⲛ’ ⲉⲡⲧⲟ‐ <text:line-break/><text:span text:style-name="T1"> </text:span><text:span text:style-name="T2">(38/5) </text:span> ⲡⲟⲥ ⲉⲧⲕⲙⲙⲁⲩ ⲉⲡⲉⲓ ⲧⲁⲛⲁⲅⲕⲏ ⲉⲣⲟⲛ ⲧⲉ <text:line-break/><text:span text:style-name="T1"> </text:span><text:span text:style-name="T2">(38/6) </text:span> ⲉⲧⲣⲛϣⲓⲛⲉ ⲛⲥⲱϥ’ ⲡⲉϫⲁϥ’ ⲛⲁⲩ ϫⲉ ⲡⲉⲧⲉⲩ‐ <text:line-break/><text:span text:style-name="T1"> </text:span><text:span text:style-name="T2">(38/7) </text:span> ⲛ ⲙⲁⲁϫⲉ ⲙⲙⲟϥ ⲙⲁⲣⲉϥ’ⲥⲱⲧⲙ ⲟⲩⲛ ⲟⲩ‐ <text:line-break/><text:span text:style-name="T1"> </text:span><text:span text:style-name="T2">(38/8) </text:span> ⲟⲉⲓⲛ’ ϣⲟⲟⲡ’ ⲙⲫⲟⲩⲛ ⲛⲛⲟⲩⲣⲙⲟⲩⲟⲉⲓⲛ <text:line-break/><text:span text:style-name="T1"> </text:span><text:span text:style-name="T2">(38/9) </text:span> ⲁⲩⲱ ϥⲣ ⲟⲩⲟⲉⲓⲛ ⲉⲡⲕⲟⲥⲙⲟⲥ ⲧⲏⲣϥ’ ⲉϥⲧⲙ‐ <text:line-break/><text:span text:style-name="T1"> </text:span><text:span text:style-name="T2">(38/10) </text:span> ⲣ ⲟⲩⲟⲉⲓⲛ’ ⲟⲩⲕⲁⲕⲉ ⲡⲉ ⲡⲉϫⲉ ⲓ̅ⲥ̅ ϫⲉ ⲙⲉⲣⲉ‐ <text:line-break/><text:span text:style-name="T1"> </text:span><text:span text:style-name="T2">(38/11) </text:span> ⲡⲉⲕⲥⲟⲛ ⲛⲑⲉ ⲛⲧⲉⲕ’ⲯⲩⲭⲏ ⲉⲣⲓⲧⲏⲣⲉⲓ ⲙⲙⲟϥ <text:line-break/><text:span text:style-name="T1"> </text:span><text:span text:style-name="T2">(38/12) </text:span> ⲛⲑⲉ ⲛⲧⲉⲗⲟⲩ ⲙⲡⲉⲕ’ⲃⲁⲗ’ ⲡⲉϫⲉ ⲓ̅ⲥ̅ ϫⲉ ⲡϫⲏ <text:line-break/><text:span text:style-name="T1"> </text:span><text:span text:style-name="T2">(38/13) </text:span> ⲉⲧϩⲙ ⲡⲃⲁⲗ ⲙⲡⲉⲕ’ⲥⲟⲛ ⲕⲛⲁⲩ ⲉⲣⲟϥ’ ⲡⲥⲟⲉⲓ <text:line-break/><text:span text:style-name="T1"> </text:span><text:span text:style-name="T2">(38/14) </text:span> ⲇⲉ ⲉⲧϩⲙ ⲡⲉⲕⲃⲁⲗ’ ⲕⲛⲁⲩ ⲁⲛ ⲉⲣⲟϥ’ ϩⲟⲧⲁⲛ <text:line-break/><text:span text:style-name="T1"> </text:span><text:span text:style-name="T2">(38/15) </text:span> ⲉⲕϣⲁⲛⲛⲟⲩϫⲉ ⲙⲡⲥⲟⲉⲓ ⲉⲃⲟⲗ ϩⲙ ⲡⲉⲕ’‐ <text:line-break/><text:span text:style-name="T1"> </text:span><text:span text:style-name="T2">(38/16) </text:span> ⲃⲁⲗ’ ⲧⲟⲧⲉ ⲕⲛⲁⲛⲁⲩ ⲉⲃⲟⲗ ⲉⲛⲟⲩϫⲉ ⲙⲡϫⲏ <text:line-break/><text:span text:style-name="T1"> </text:span><text:span text:style-name="T2">(38/17) </text:span> ⲉⲃⲟⲗ ϩⲙ ⲡⲃⲁⲗ ⲙⲡⲉⲕⲥⲟⲛ 〈ⲡⲉϫⲉ ⲓ̅ⲥ̅ ϫⲉ〉 ⲉⲧⲉ〈ⲧⲛ〉ⲧⲙⲣⲛⲏ‐ <text:line-break/><text:span text:style-name="T1"> </text:span><text:span text:style-name="T2">(38/18) </text:span> ⲥⲧⲉⲩⲉ ⲉⲡⲕⲟⲥⲙⲟⲥ ⲧⲉⲧⲛⲁϩⲉ ⲁⲛ’ ⲉⲧⲙⲛⲧⲉ‐ <text:line-break/><text:span text:style-name="T1"> </text:span><text:span text:style-name="T2">(38/19) </text:span> ⲣⲟ ⲉⲧⲉⲧⲛⲧⲙⲉⲓⲣⲉ ⲙⲡⲥⲁⲙⲃⲁⲧⲟⲛ ⲛⲥⲁⲃ’‐ <text:line-break/><text:span text:style-name="T1"> </text:span><text:span text:style-name="T2">(38/20) </text:span> ⲃⲁⲧⲟⲛ ⲛⲧⲉⲧⲛⲁⲛⲁⲩ ⲁⲛ ⲉⲡⲉⲓⲱⲧ’ ⲡⲉϫⲉ <text:line-break/><text:span text:style-name="T1"> </text:span><text:span text:style-name="T2">(38/21) </text:span> ⲓ̅ⲥ̅ ϫⲉ ⲁⲉⲓⲱϩⲉ ⲉⲣⲁⲧ’ ϩⲛ ⲧⲙⲏⲧⲉ ⲙⲡⲕⲟⲥ‐ <text:line-break/><text:span text:style-name="T1"> </text:span><text:span text:style-name="T2">(38/22) </text:span> ⲙⲟⲥ ⲁⲩⲱ ⲁⲉⲓⲟⲩⲱⲛϩ ⲉⲃⲟⲗ ⲛⲁⲩ ϩⲛ ⲥⲁⲣⲝ <text:line-break/><text:span text:style-name="T1"> </text:span><text:span text:style-name="T2">(38/23) </text:span> ⲁⲉⲓϩⲉ ⲉⲣⲟⲟⲩ ⲧⲏⲣⲟⲩ ⲉⲩⲧⲁϩⲉ ⲙⲡⲓϩⲉ ⲉⲗⲁ‐ <text:line-break/><text:span text:style-name="T1"> </text:span><text:span text:style-name="T2">(38/24) </text:span> ⲁⲩ ⲛϩⲏⲧⲟⲩ ⲉϥⲟⲃⲉ ⲁⲩⲱ ⲁⲧⲁⲯⲩⲭⲏ ϯ ⲧⲕⲁⲥ <text:line-break/><text:span text:style-name="T1"> </text:span><text:span text:style-name="T2">(38/25) </text:span> ⲉϫⲛ ⲛϣⲏⲣⲉ ⲛⲣⲣⲱⲙⲉ ϫⲉ ϩⲛⲃⲗⲗⲉⲉⲩ‐ <text:line-break/><text:span text:style-name="T1"> </text:span><text:span text:style-name="T2">(38/26) </text:span> ⲉ ⲛⲉ ϩⲙ ⲡⲟⲩϩⲏⲧ’ ⲁⲩⲱ ⲥⲉⲛⲁⲩ ⲉⲃⲟⲗ ⲁⲛ <text:line-break/><text:span text:style-name="T1"> </text:span><text:span text:style-name="T2">(38/27) </text:span> ϫⲉ ⲛⲧⲁⲩⲉⲓ ⲉⲡⲕⲟⲥⲙⲟⲥ ⲉⲩϣⲟⲩⲉⲓⲧ’ ⲉⲩ‐ <text:line-break/><text:span text:style-name="T1"> </text:span><text:span text:style-name="T2">(38/28) </text:span> ϣⲓⲛⲉ ⲟⲛ ⲉⲧⲣⲟⲩⲉⲓ ⲉⲃⲟⲗ ϩⲙ ⲡⲕⲟⲥⲙⲟⲥ <text:line-break/><text:span text:style-name="T1"> </text:span><text:span text:style-name="T2">(38/29) </text:span> ⲉⲩϣⲟⲩⲉⲓⲧ’ ⲡⲗⲏⲛ ⲧⲉⲛⲟⲩ ⲥⲉⲧⲟϩⲉ ϩⲟ‐ <text:line-break/><text:span text:style-name="T1"> </text:span><text:span text:style-name="T2">(38/30) </text:span> ⲧⲁⲛ ⲉⲩϣⲁⲛⲛⲉϩ ⲡⲟⲩⲏⲣⲡ’ ⲧⲟⲧⲉ ⲥⲉⲛⲁⲣ‐ <text:line-break/><text:span text:style-name="T1"> </text:span><text:span text:style-name="T2">(38/31) </text:span> ⲙⲉⲧⲁⲛⲟⲉⲓ ⲡⲉϫⲉ ⲓ̅ⲥ̅ ⲉϣϫⲉ ⲛⲧⲁ ⲧⲥⲁⲣⲝ’ <text:line-break/><text:span text:style-name="T1"> </text:span><text:span text:style-name="T2">(38/32) </text:span> ϣⲱⲡⲉ ⲉⲧⲃⲉ ⲡⲛ̅ⲁ̅ ⲟⲩϣⲡⲏⲣⲉ ⲧⲉ ⲉϣ‐ <text:line-break/><text:span text:style-name="T1"> </text:span><text:span text:style-name="T2">(38/33) </text:span> ϫⲉ ⲡⲛ̅ⲁ̅ ⲇⲉ ⲉⲧⲃⲉ ⲡⲥⲱⲙⲁ ⲟⲩϣⲡⲏⲣⲉ <text:line-break/><text:span text:style-name="T1"> </text:span><text:span text:style-name="T2">(38/34) </text:span> ⲛϣⲡⲏⲣ̣ⲉ ⲡⲉ ⲁⲗⲗⲁ ⲁⲛⲟⲕ’ ϯⲣ ϣⲡⲏⲣⲉ <text:line-break/><text:span text:style-name="T1"> </text:span><text:span text:style-name="T2">(39/1) </text:span> ⲙⲡⲁⲉⲓ ϫⲉ ⲡⲱⲥ̣ ⲁⲧ̣ⲉ̣ⲉ̣ⲓⲛⲟϭ ⲙⲙ̅ⲛ̅ⲧ̅ⲣⲙⲙⲁ‐ <text:line-break/><text:span text:style-name="T1"> </text:span><text:span text:style-name="T2">(39/2) </text:span> ⲟ ⲁⲥⲟⲩⲱϩ ϩⲛ ⲧⲉⲉⲓⲙ̅ⲛ̅ⲧ̅ϩⲏⲕⲉ ⲡⲉϫⲉ ⲓ̅ⲥ̅ <text:line-break/><text:span text:style-name="T1"> </text:span><text:span text:style-name="T2">(39/3) </text:span> ϫⲉ ⲡⲙⲁ ⲉⲩⲛ ϣⲟⲙⲧ ⲛⲛⲟⲩⲧⲉ ⲙⲙⲁⲩ ϩⲛ‐ <text:line-break/><text:span text:style-name="T1"> </text:span><text:span text:style-name="T2">(39/4) </text:span> ⲛⲟⲩⲧⲉ ⲛⲉ ⲡⲙⲁ ⲉⲩⲛ ⲥⲛⲁⲩ ⲏ ⲟⲩⲁ ⲁⲛⲟⲕ’ <text:line-break/><text:span text:style-name="T1"> </text:span><text:span text:style-name="T2">(39/5) </text:span> ϯϣⲟⲟⲡ’ ⲛⲙⲙⲁϥ’ ⲡⲉϫⲉ ⲓ̅ⲥ̅ ⲙⲛ ⲡⲣⲟⲫⲏ‐ <text:line-break/><text:span text:style-name="T1"> </text:span><text:span text:style-name="T2">(39/6) </text:span> ⲧⲏⲥ ϣⲏⲡ’ ϩⲙ ⲡⲉϥϯⲙⲉ ⲙⲁⲣⲉ ⲥⲟⲉⲓⲛ ⲣⲑⲉ‐ <text:line-break/><text:span text:style-name="T1"> </text:span><text:span text:style-name="T2">(39/7) </text:span> ⲣⲁⲡⲉⲩⲉ ⲛⲛⲉⲧ’ⲥⲟⲟⲩⲛ ⲙⲙⲟϥ’ ⲡⲉϫⲉ ⲓ̅ⲥ̅ <text:line-break/><text:soft-page-break/><text:span text:style-name="T1"> </text:span><text:span text:style-name="T2">(39/8) </text:span> ϫⲉ ⲟⲩⲡⲟⲗⲓⲥ ⲉⲩⲕⲱⲧ ⲙⲙⲟⲥ ϩⲓϫⲛ ⲟⲩⲧⲟ‐ <text:line-break/><text:span text:style-name="T1"> </text:span><text:span text:style-name="T2">(39/9) </text:span> ⲟⲩ ⲉϥϫⲟⲥⲉ ⲉⲥⲧⲁϫⲣⲏⲩ ⲙⲛ ϭⲟⲙ ⲛⲥϩⲉ <text:line-break/><text:span text:style-name="T1"> </text:span><text:span text:style-name="T2">(39/10) </text:span> ⲟⲩⲇⲉ ⲥⲛⲁϣϩⲱⲡ’ ⲁⲛ ⲡⲉϫⲉ ⲓ̅ⲥ̅ ⲡⲉⲧ’ⲕⲛⲁ‐ <text:line-break/><text:span text:style-name="T1"> </text:span><text:span text:style-name="T2">(39/11) </text:span> ⲥⲱⲧⲙ ⲉⲣⲟϥ ϩⲙ ⲡⲉⲕ’ⲙⲁⲁϫⲉ ϩⲙ ⲡⲕⲉⲙⲁ‐ <text:line-break/><text:span text:style-name="T1"> </text:span><text:span text:style-name="T2">(39/12) </text:span> ⲁϫⲉ ⲧⲁϣⲉ ⲟⲉⲓϣ’ ⲙⲙⲟϥ’ ϩⲓϫⲛ ⲛⲉⲧⲛϫⲉ‐ <text:line-break/><text:span text:style-name="T1"> </text:span><text:span text:style-name="T2">(39/13) </text:span> ⲛⲉⲡⲱⲣ’ ⲙⲁⲣⲉ ⲗⲁⲁⲩ’ ⲅⲁⲣ ϫⲉⲣⲉ ϩⲏⲃ̅ⲥ̅ ⲛϥ’‐ <text:line-break/><text:span text:style-name="T1"> </text:span><text:span text:style-name="T2">(39/14) </text:span> ⲕⲁⲁϥ’ ϩⲁ ⲙⲁⲁϫⲉ ⲟⲩⲇⲉ ⲙⲁϥⲕⲁⲁϥ’ ϩⲙ ⲙⲁ <text:line-break/><text:span text:style-name="T1"> </text:span><text:span text:style-name="T2">(39/15) </text:span> ⲉϥϩⲏⲡ’ ⲁⲗⲗⲁ ⲉϣⲁⲣⲉϥⲕⲁⲁϥ’ ϩⲓϫⲛ ⲧⲗⲩ‐ <text:line-break/><text:span text:style-name="T1"> </text:span><text:span text:style-name="T2">(39/16) </text:span> ⲭⲛⲓⲁ ϫⲉⲕⲁⲁⲥ ⲟⲩⲟⲛ ⲛⲓⲙ’ ⲉⲧⲃⲏⲕ’ ⲉϩⲟⲩⲛ <text:line-break/><text:span text:style-name="T1"> </text:span><text:span text:style-name="T2">(39/17) </text:span> ⲁⲩⲱ ⲉⲧⲛⲛⲏⲩ ⲉⲃⲟⲗ ⲉⲩⲛⲁⲛⲁⲩ ⲁⲡⲉϥⲟⲩ‐ <text:line-break/><text:span text:style-name="T1"> </text:span><text:span text:style-name="T2">(39/18) </text:span> ⲟⲉⲓⲛ ⲡⲉϫⲉ ⲓ̅ⲥ̅ ϫⲉ ⲟⲩⲃⲗⲗⲉ ⲉϥϣⲁⲛ’ⲥⲱⲕ’ <text:line-break/><text:span text:style-name="T1"> </text:span><text:span text:style-name="T2">(39/19) </text:span> ϩⲏⲧϥ’ ⲛⲛⲟⲩⲃⲗⲗⲉ ϣⲁⲩϩⲉ ⲙⲡⲉⲥⲛⲁⲩ’ <text:line-break/><text:span text:style-name="T1"> </text:span><text:span text:style-name="T2">(39/20) </text:span> ⲉⲡⲉⲥⲏⲧ’ ⲉⲩϩⲓⲉⲓⲧ’ ⲡⲉϫⲉ ⲓ̅ⲥ̅ ⲙⲛ ϭⲟⲙ’ <text:line-break/><text:span text:style-name="T1"> </text:span><text:span text:style-name="T2">(39/21) </text:span> ⲛⲧⲉ ⲟⲩⲁ ⲃⲱⲕ’ ⲉϩⲟⲩⲛ ⲉⲡⲏⲉⲓ ⲙⲡϫⲱ‐ <text:line-break/><text:span text:style-name="T1"> </text:span><text:span text:style-name="T2">(39/22) </text:span> ⲱⲣⲉ ⲛϥϫⲓⲧϥ’ ⲛϫⲛⲁϩ ⲉⲓ ⲙⲏⲧⲓ ⲛϥⲙⲟⲩⲣ <text:line-break/><text:span text:style-name="T1"> </text:span><text:span text:style-name="T2">(39/23) </text:span> ⲛⲛⲉϥϭⲓϫ’ ⲧⲟⲧⲉ ϥⲛⲁⲡⲱⲱⲛⲉ ⲉⲃⲟⲗ <text:line-break/><text:span text:style-name="T1"> </text:span><text:span text:style-name="T2">(39/24) </text:span> ⲙⲡⲉϥⲏⲉⲓ ⲡⲉϫⲉ ⲓ̅ⲥ̅ ⲙⲛϥⲓ ⲣⲟⲟⲩϣ ϫⲓⲛ <text:line-break/><text:span text:style-name="T1"> </text:span><text:span text:style-name="T2">(39/25) </text:span> ϩⲧⲟⲟⲩⲉ ϣⲁ ⲣⲟⲩϩⲉ ⲁⲩⲱ ϫⲓⲛ ϩⲓⲣⲟⲩϩⲉ <text:line-break/><text:span text:style-name="T1"> </text:span><text:span text:style-name="T2">(39/26) </text:span> ϣⲁ ϩⲧⲟⲟⲩⲉ ϫⲉ ⲟⲩ ⲡⲉ〈ⲧ〉ⲉⲧⲛⲁⲧⲁⲁϥ ϩⲓⲱⲧ’ <text:line-break/><text:span text:style-name="T1"> </text:span><text:span text:style-name="T2">(39/27) </text:span> ⲧⲏⲩⲧⲛ ⲡⲉϫⲉ ⲛⲉϥⲙⲁⲑⲏⲧⲏⲥ ϫⲉ ⲁϣ ⲛ‐ <text:line-break/><text:span text:style-name="T1"> </text:span><text:span text:style-name="T2">(39/28) </text:span> ϩⲟⲟⲩ ⲉⲕⲛⲁⲟⲩⲱⲛϩ ⲉⲃⲟⲗ ⲛⲁⲛ ⲁⲩⲱ ⲁϣ <text:line-break/><text:span text:style-name="T1"> </text:span><text:span text:style-name="T2">(39/29) </text:span> ⲛϩⲟⲟⲩ ⲉⲛⲁⲛⲁⲩ ⲉⲣⲟⲕ’ ⲡⲉϫⲉ ⲓ̅ⲥ̅ ϫⲉ ϩⲟ‐ <text:line-break/><text:span text:style-name="T1"> </text:span><text:span text:style-name="T2">(39/30) </text:span> ⲧⲁⲛ ⲉⲧⲉⲧⲛϣⲁⲕⲉⲕ ⲧⲏⲩⲧⲛ ⲉϩⲏⲩ ⲙⲡⲉ‐ <text:line-break/><text:span text:style-name="T1"> </text:span><text:span text:style-name="T2">(39/31) </text:span> ⲧⲛϣⲓⲡⲉ ⲁⲩⲱ ⲛⲧⲉⲧⲛϥⲓ ⲛⲛⲉⲧⲛϣⲧⲏⲛ <text:line-break/><text:span text:style-name="T1"> </text:span><text:span text:style-name="T2">(39/32) </text:span> ⲛⲧⲉⲧⲛⲕⲁⲁⲩ ϩⲁ ⲡⲉⲥⲏⲧ’ ⲛⲛⲉⲧⲛⲟⲩⲉⲣⲏ‐ <text:line-break/><text:span text:style-name="T1"> </text:span><text:span text:style-name="T2">(39/33) </text:span> ⲧⲉ ⲛⲑⲉ ⲛⲛⲓⲕⲟⲩⲉⲓ ⲛϣⲏⲣⲉ ϣⲏⲙ’ ⲛⲧⲉ‐ <text:line-break/><text:span text:style-name="T1"> </text:span><text:span text:style-name="T2">(39/34) </text:span> ⲧⲛϫⲟⲡϫ̅ⲡ̅ ⲙⲙⲟⲟⲩ ⲧⲟⲧⲉ̣ [ⲧⲉⲧ]ⲛ̣ⲁ̣ⲛ̣ⲁ̣ⲩ <text:line-break/><text:span text:style-name="T1"> </text:span><text:span text:style-name="T2">(40/1) </text:span> ⲉⲡϣⲏⲣⲉ ⲙⲡⲉⲧⲟⲛϩ ⲁⲩⲱ ⲧⲉⲧⲛⲁⲣ <text:line-break/><text:span text:style-name="T1"> </text:span><text:span text:style-name="T2">(40/2) </text:span> ϩⲟⲧⲉ ⲁⲛ ⲡⲉϫⲉ ⲓ̅ⲥ̅ ϫⲉ ϩⲁϩ ⲛⲥⲟⲡ’ ⲁⲧⲉⲧⲛ‐ <text:line-break/><text:span text:style-name="T1"> </text:span><text:span text:style-name="T2">(40/3) </text:span> ⲣⲉⲡⲓⲑⲩⲙⲉⲓ ⲉⲥⲱⲧⲙ ⲁⲛⲉⲉⲓϣⲁϫⲉ ⲛⲁⲉⲓ’ <text:line-break/><text:span text:style-name="T1"> </text:span><text:span text:style-name="T2">(40/4) </text:span> ⲉϯϫⲱ ⲙⲙⲟⲟⲩ ⲛⲏⲧⲛ ⲁⲩⲱ ⲙⲛⲧⲏⲧⲛ <text:line-break/><text:span text:style-name="T1"> </text:span><text:span text:style-name="T2">(40/5) </text:span> ⲕⲉⲟⲩⲁ ⲉⲥⲟⲧⲙⲟⲩ ⲛⲧⲟⲟⲧϥ’ ⲟⲩⲛ ϩⲛϩⲟ‐ <text:line-break/><text:span text:style-name="T1"> </text:span><text:span text:style-name="T2">(40/6) </text:span> ⲟⲩ ⲛⲁϣⲱⲡⲉ ⲛⲧⲉⲧⲛϣⲓⲛⲉ ⲛⲥⲱⲉⲓ ⲧⲉ‐ <text:line-break/><text:span text:style-name="T1"> </text:span><text:span text:style-name="T2">(40/7) </text:span> ⲧⲛⲁϩⲉ ⲁⲛ’ ⲉⲣⲟⲉⲓ’ ⲡⲉϫⲉ ⲓ̅ⲥ̅ ϫⲉ ⲙⲫⲁⲣⲓⲥⲁⲓ‐ <text:line-break/><text:span text:style-name="T1"> </text:span><text:span text:style-name="T2">(40/8) </text:span> ⲟⲥ ⲙⲛ ⲛⲅⲣⲁⲙⲙⲁⲧⲉⲩⲥ ⲁⲩϫⲓ ⲛϣⲁϣⲧ’ <text:line-break/><text:span text:style-name="T1"> </text:span><text:span text:style-name="T2">(40/9) </text:span> ⲛⲧⲅⲛⲱⲥⲓⲥ ⲁⲩϩⲟⲡⲟⲩ ⲟⲩⲧⲉ ⲙⲡⲟⲩⲃⲱⲕ’ <text:line-break/><text:span text:style-name="T1"> </text:span><text:span text:style-name="T2">(40/10) </text:span> ⲉϩⲟⲩⲛ ⲁⲩⲱ ⲛⲉⲧⲟⲩⲱϣ ⲉⲃⲱⲕ’ ⲉϩⲟⲩⲛ ⲙ‐ <text:line-break/><text:span text:style-name="T1"> </text:span><text:span text:style-name="T2">(40/11) </text:span> ⲡⲟⲩⲕⲁⲁⲩ ⲛⲧⲱⲧⲛ ⲇⲉ ϣⲱⲡⲉ ⲙⲫⲣⲟⲛⲓⲙⲟⲥ <text:line-break/><text:span text:style-name="T1"> </text:span><text:span text:style-name="T2">(40/12) </text:span> ⲛⲑⲉ ⲛⲛϩⲟϥ’ ⲁⲩⲱ ⲛⲁⲕⲉⲣⲁⲓⲟⲥ ⲛⲑⲉ ⲛⲛ‐ <text:line-break/><text:span text:style-name="T1"> </text:span><text:span text:style-name="T2">(40/13) </text:span> ϭⲣⲟⲙ’ⲡⲉ ⲡⲉϫⲉ ⲓ̅ⲥ̅ ⲟⲩⲃⲉⲛⲉⲗⲟⲟⲗⲉ ⲁⲩ‐ <text:line-break/><text:span text:style-name="T1"> </text:span><text:span text:style-name="T2">(40/14) </text:span> ⲧⲟϭⲥ ⲙⲡⲥⲁ ⲛⲃⲟⲗ ⲙⲡⲉⲓⲱⲧ’ ⲁⲩⲱ ⲉⲥⲧⲁ’‐ <text:line-break/><text:span text:style-name="T1"> </text:span><text:span text:style-name="T2">(40/15) </text:span> ϫⲣⲏⲩ ⲁⲛ ⲥⲉⲛⲁⲡⲟⲣⲕⲥ ϩⲁ ⲧⲉⲥⲛⲟⲩⲛⲉ ⲛⲥ‐ <text:line-break/><text:span text:style-name="T1"> </text:span><text:span text:style-name="T2">(40/16) </text:span> ⲧⲁⲕⲟ ⲡⲉϫⲉ ⲓ̅ⲥ̅ ϫⲉ ⲡⲉⲧⲉⲩⲛⲧⲁϥ’ ϩⲛ ⲧⲉϥ’‐ <text:line-break/><text:span text:style-name="T1"> </text:span><text:span text:style-name="T2">(40/17) </text:span> ϭⲓϫ ⲥⲉⲛⲁϯ ⲛⲁϥ’ ⲁⲩⲱ ⲡⲉⲧⲉ ⲙⲛⲧⲁϥ ⲡⲕⲉ‐ <text:line-break/><text:span text:style-name="T1"> </text:span><text:span text:style-name="T2">(40/18) </text:span> ϣⲏⲙ ⲉⲧⲟⲩⲛⲧⲁϥ’ ⲥⲉⲛⲁϥⲓⲧϥ ⲛⲧⲟⲟⲧϥ’ <text:line-break/><text:span text:style-name="T1"> </text:span><text:span text:style-name="T2">(40/19) </text:span> ⲡⲉϫⲉ ⲓ̅ⲥ̅ ϫⲉ ϣⲱⲡⲉ ⲉⲧⲉⲧⲛⲣⲡⲁⲣⲁⲅⲉ <text:line-break/><text:span text:style-name="T1"> </text:span><text:span text:style-name="T2">(40/20) </text:span> ⲡⲉϫⲁⲩ ⲛⲁϥ’ ⲛϭⲓ ⲛⲉϥ’ⲙⲁⲑⲏⲧⲏⲥ ϫⲉ ⲛⲧⲁⲕ’ <text:line-break/><text:soft-page-break/><text:span text:style-name="T1"> </text:span><text:span text:style-name="T2">(40/21) </text:span> ⲛⲓⲙ’ ⲉⲕϫⲱ ⲛⲛⲁⲓ̈ ⲛⲁⲛ 〈ⲡⲉϫⲉ ⲓ̅ⲥ̅ ⲛⲁⲩ ϫⲉ〉 ϩⲛ ⲛⲉϯϫⲱ ⲙ‐ <text:line-break/><text:span text:style-name="T1"> </text:span><text:span text:style-name="T2">(40/22) </text:span> ⲙⲟⲟⲩ ⲛⲏⲧⲛ ⲛⲧⲉⲧⲛⲉⲓⲙⲉ ⲁⲛ ϫⲉ ⲁⲛⲟⲕ’ <text:line-break/><text:span text:style-name="T1"> </text:span><text:span text:style-name="T2">(40/23) </text:span> ⲛⲓⲙ ⲁⲗⲗⲁ ⲛⲧⲱⲧⲛ ⲁⲧⲉⲧⲛϣⲱⲡⲉ ⲛⲑⲉ ⲛ‐ <text:line-break/><text:span text:style-name="T1"> </text:span><text:span text:style-name="T2">(40/24) </text:span> ⲛⲓⲓ̈ⲟⲩⲇⲁⲓⲟⲥ ϫⲉ ⲥⲉⲙⲉ ⲙⲡϣⲏⲛ ⲥⲉⲙⲟⲥ‐ <text:line-break/><text:span text:style-name="T1"> </text:span><text:span text:style-name="T2">(40/25) </text:span> ⲧⲉ ⲙⲡⲉϥⲕⲁⲣⲡⲟⲥ ⲁⲩⲱ ⲥⲉⲙⲉ ⲙⲡⲕⲁⲣⲡⲟⲥ <text:line-break/><text:span text:style-name="T1"> </text:span><text:span text:style-name="T2">(40/26) </text:span> ⲥⲉⲙⲟⲥⲧⲉ ⲙⲡϣⲏⲛ ⲡⲉϫⲉ ⲓ̅ⲥ̅ ϫⲉ ⲡⲉⲧⲁϫⲉ <text:line-break/><text:span text:style-name="T1"> </text:span><text:span text:style-name="T2">(40/27) </text:span> ⲟⲩⲁ ⲁⲡⲉⲓⲱⲧ’ ⲥⲉⲛⲁⲕⲱ ⲉⲃⲟⲗ ⲛⲁϥ’ ⲁⲩⲱ <text:line-break/><text:span text:style-name="T1"> </text:span><text:span text:style-name="T2">(40/28) </text:span> ⲡⲉⲧⲁϫⲉ ⲟⲩⲁ ⲉⲡϣⲏⲣⲉ ⲥⲉⲛⲁⲕⲱ ⲉⲃⲟⲗ <text:line-break/><text:span text:style-name="T1"> </text:span><text:span text:style-name="T2">(40/29) </text:span> ⲛⲁϥ’ ⲡⲉⲧⲁϫⲉ ⲟⲩⲁ ⲇⲉ ⲁⲡⲡ̅ⲛ̅ⲁ̅ ⲉⲧⲟⲩⲁⲁⲃ <text:line-break/><text:span text:style-name="T1"> </text:span><text:span text:style-name="T2">(40/30) </text:span> ⲥⲉⲛⲁⲕⲱ ⲁⲛ ⲉⲃⲟⲗ ⲛⲁϥ’ ⲟⲩⲧⲉ ϩⲙ ⲡⲕⲁϩ <text:line-break/><text:span text:style-name="T1"> </text:span><text:span text:style-name="T2">(40/31) </text:span> ⲟⲩⲧⲉ ϩⲛ ⲧⲡⲉ ⲡⲉϫⲉ ⲓ̅ⲥ̅ ⲙⲁⲩϫⲉⲗⲉ ⲉⲗⲟⲟ‐ <text:line-break/><text:span text:style-name="T1"> </text:span><text:span text:style-name="T2">(40/32) </text:span> ⲗⲉ ⲉⲃⲟⲗ ϩⲛ ϣⲟⲛⲧⲉ ⲟⲩⲧⲉ ⲙⲁⲩⲕⲱⲧϥ’ <text:line-break/><text:span text:style-name="T1"> </text:span><text:span text:style-name="T2">(40/33) </text:span> ⲕⲛⲧⲉ ⲉⲃⲟⲗ ϩⲛ ⲥⲣϭⲁⲙⲟⲩⲗ’ ⲙⲁⲩϯ ⲕⲁⲣⲡⲟⲥ <text:line-break/><text:span text:style-name="T1"> </text:span><text:span text:style-name="T2">(40/34) </text:span> ⲅⲁ̣ⲣ̣ ⲟ̣ⲩ̣ⲁ̣ⲅ̣ⲁ̣ⲑⲟⲥ ⲣⲣⲱⲙⲉ ϣⲁϥⲉⲓⲛⲉ ⲛ‐ <text:line-break/><text:span text:style-name="T1"> </text:span><text:span text:style-name="T2">(41/1) </text:span> ⲟⲩⲁⲅⲁⲑⲟⲛ ⲉⲃⲟⲗ ϩⲙ̣ ⲡⲉϥⲉϩⲟ ⲟⲩⲕⲁⲕ̣[ⲟⲥ] <text:line-break/><text:span text:style-name="T1"> </text:span><text:span text:style-name="T2">(41/2) </text:span> ⲣⲣⲱⲙⲉ ϣⲁϥⲉⲓⲛⲉ ⲛϩⲛⲡⲟⲛⲏⲣⲟⲛ ⲉⲃⲟⲗ <text:line-break/><text:span text:style-name="T1"> </text:span><text:span text:style-name="T2">(41/3) </text:span> ϩⲙ ⲡⲉϥⲉϩⲟ ⲉⲑⲟⲟⲩ ⲉⲧϩⲛ ⲡⲉϥϩⲏⲧ’ ⲁⲩ‐ <text:line-break/><text:span text:style-name="T1"> </text:span><text:span text:style-name="T2">(41/4) </text:span> ⲱ ⲛϥϫⲱ ⲛϩⲛⲡⲟⲛⲏⲣⲟⲛ ⲉⲃⲟⲗ ⲅⲁⲣ ϩⲙ <text:line-break/><text:span text:style-name="T1"> </text:span><text:span text:style-name="T2">(41/5) </text:span> ⲫⲟⲩⲟ ⲙⲫⲏⲧ’ ϣⲁϥ’ⲉⲓⲛⲉ ⲉⲃⲟⲗ ⲛϩⲛⲡⲟ‐ <text:line-break/><text:span text:style-name="T1"> </text:span><text:span text:style-name="T2">(41/6) </text:span> ⲛⲏⲣⲟⲛ ⲡⲉϫⲉ ⲓ̅ⲥ̅ ϫⲉ ϫⲓⲛ’ ⲁⲇⲁⲙ ϣⲁ ⲓ̈ⲱϩⲁⲛ‐ <text:line-break/><text:span text:style-name="T1"> </text:span><text:span text:style-name="T2">(41/7) </text:span> ⲛⲏⲥ ⲡⲃⲁⲡⲧⲓⲥⲧⲏⲥ ϩⲛ ⲛϫⲡⲟ ⲛⲛϩⲓⲟⲙⲉ <text:line-break/><text:span text:style-name="T1"> </text:span><text:span text:style-name="T2">(41/8) </text:span> ⲙⲛ ⲡⲉⲧϫⲟⲥⲉ ⲁⲓ̈ⲱϩⲁⲛⲛⲏⲥ ⲡⲃⲁⲡⲧⲓ‐ <text:line-break/><text:span text:style-name="T1"> </text:span><text:span text:style-name="T2">(41/9) </text:span> ⲥⲧⲏⲥ ϣⲓⲛⲁ ϫⲉ ⲛⲟⲩⲱϭⲡ’ ⲛϭⲓ ⲛⲉϥⲃⲁⲗ <text:line-break/><text:span text:style-name="T1"> </text:span><text:span text:style-name="T2">(41/10) </text:span> ⲁⲉⲓϫⲟⲟⲥ ⲇⲉ ϫⲉ ⲡⲉⲧⲛⲁϣⲱⲡⲉ ϩⲛ ⲧⲏⲩ‐ <text:line-break/><text:span text:style-name="T1"> </text:span><text:span text:style-name="T2">(41/11) </text:span> ⲧⲛ ⲉϥⲟ ⲛⲕⲟⲩⲉⲓ ϥⲛⲁⲥⲟⲩⲱⲛ ⲧⲙⲛⲧⲉ‐ <text:line-break/><text:span text:style-name="T1"> </text:span><text:span text:style-name="T2">(41/12) </text:span> ⲣⲟ ⲁⲩⲱ ϥⲛⲁϫⲓⲥⲉ ⲁⲓ̈ⲱϩⲁⲛⲛⲏⲥ ⲡⲉϫⲉ ⲓ̅ⲥ̅ <text:line-break/><text:span text:style-name="T1"> </text:span><text:span text:style-name="T2">(41/13) </text:span> ϫⲉ ⲙⲛ ϭⲟⲙ ⲛⲧⲉ ⲟⲩⲣⲱⲙⲉ ⲧⲉⲗⲟ ⲁϩⲧⲟ <text:line-break/><text:span text:style-name="T1"> </text:span><text:span text:style-name="T2">(41/14) </text:span> ⲥⲛⲁⲩ ⲛϥϫⲱⲗⲕ’ ⲙⲡⲓⲧⲉ ⲥⲛⲧⲉ ⲁⲩⲱ ⲙⲛ <text:line-break/><text:span text:style-name="T1"> </text:span><text:span text:style-name="T2">(41/15) </text:span> ϭⲟⲙ’ ⲛⲧⲉ ⲟⲩϩⲙϩ̅ⲁ̅ⲗ̅ ϣⲙϣⲉ ϫⲟⲉⲓⲥ ⲥⲛⲁⲩ <text:line-break/><text:span text:style-name="T1"> </text:span><text:span text:style-name="T2">(41/16) </text:span> ⲏ ϥⲛⲁⲣⲧⲓⲙⲁ ⲙⲡⲟⲩⲁ’ ⲁⲩⲱ ⲡⲕⲉⲟⲩⲁ ϥⲛⲁ‐ <text:line-break/><text:span text:style-name="T1"> </text:span><text:span text:style-name="T2">(41/17) </text:span> ⲣϩⲩⲃⲣⲓⲍⲉ ⲙⲙⲟϥ’ ⲙⲁⲣⲉ ⲣⲱⲙⲉ ⲥⲉ ⲣⲡⲁⲥ <text:line-break/><text:span text:style-name="T1"> </text:span><text:span text:style-name="T2">(41/18) </text:span> ⲁⲩⲱ ⲛⲧⲉⲩⲛⲟⲩ ⲛϥ’ⲉⲡⲓⲑⲩⲙⲉⲓ ⲁⲥⲱ ⲏⲣⲡ’ <text:line-break/><text:span text:style-name="T1"> </text:span><text:span text:style-name="T2">(41/19) </text:span> ⲃⲃⲣⲣⲉ ⲁⲩⲱ ⲙⲁⲩⲛⲟⲩϫ’ ⲏⲣⲡ’ ⲃⲃⲣⲣⲉ ⲉⲁⲥ‐ <text:line-break/><text:span text:style-name="T1"> </text:span><text:span text:style-name="T2">(41/20) </text:span> ⲕⲟⲥ ⲛⲁⲥ ϫⲉⲕⲁⲁⲥ ⲛⲛⲟⲩⲡⲱϩ ⲁⲩⲱ ⲙⲁⲩ‐ <text:line-break/><text:span text:style-name="T1"> </text:span><text:span text:style-name="T2">(41/21) </text:span> ⲛⲉϫ’ ⲏⲣⲡ’ ⲛⲁⲥ ⲉⲁⲥⲕⲟⲥ ⲃⲃⲣⲣⲉ ϣⲓⲛⲁ ϫⲉ <text:line-break/><text:span text:style-name="T1"> </text:span><text:span text:style-name="T2">(41/22) </text:span> ⲛⲉϥⲧⲉⲕⲁϥ’ ⲙⲁⲩϫⲗϭ ⲧⲟⲉⲓⲥ ⲛⲁⲥ ⲁϣⲧⲏⲛ <text:line-break/><text:span text:style-name="T1"> </text:span><text:span text:style-name="T2">(41/23) </text:span> ⲛϣⲁⲉⲓ ⲉⲡⲉⲓ ⲟⲩⲛ ⲟⲩⲡⲱϩ ⲛⲁϣⲱⲡⲉ <text:line-break/><text:span text:style-name="T1"> </text:span><text:span text:style-name="T2">(41/24) </text:span> ⲡⲉϫⲉ ⲓ̅ⲥ̅ ϫⲉ ⲉⲣϣⲁ ⲥⲛⲁⲩ ⲣ ⲉⲓⲣⲏⲛⲏ ⲙⲛ <text:line-break/><text:span text:style-name="T1"> </text:span><text:span text:style-name="T2">(41/25) </text:span> ⲛⲟⲩⲉⲣⲏⲩ ϩⲙ ⲡⲉⲓⲏⲉⲓ ⲟⲩⲱⲧ’ ⲥⲉⲛⲁϫⲟⲟⲥ <text:line-break/><text:span text:style-name="T1"> </text:span><text:span text:style-name="T2">(41/26) </text:span> ⲙⲡⲧⲁⲩ ϫⲉ ⲡⲱⲱⲛⲉ ⲉⲃⲟⲗ ⲁⲩⲱ ϥⲛⲁⲡⲱ‐ <text:line-break/><text:span text:style-name="T1"> </text:span><text:span text:style-name="T2">(41/27) </text:span> ⲱⲛⲉ ⲡⲉϫⲉ ⲓ̅ⲥ̅ ϫⲉ ϩⲉⲛⲙⲁⲕⲁⲣⲓⲟⲥ ⲛⲉ ⲛ‐ <text:line-break/><text:span text:style-name="T1"> </text:span><text:span text:style-name="T2">(41/28) </text:span> ⲙⲟⲛⲁⲭⲟⲥ ⲁⲩⲱ ⲉⲧⲥⲟⲧⲡ’ ϫⲉ ⲧⲉⲧⲛⲁ‐ <text:line-break/><text:span text:style-name="T1"> </text:span><text:span text:style-name="T2">(41/29) </text:span> ϩⲉ ⲁⲧⲙⲛⲧⲉⲣⲟ ϫⲉ ⲛⲧⲱⲧⲛ ϩⲛⲉⲃⲟⲗ <text:line-break/><text:span text:style-name="T1"> </text:span><text:span text:style-name="T2">(41/30) </text:span> ⲛϩⲏⲧⲥ ⲡⲁⲗⲓⲛ ⲉⲧⲉⲧⲛⲁⲃⲱⲕ’ ⲉⲙⲁⲩ ⲡⲉ‐ <text:line-break/><text:span text:style-name="T1"> </text:span><text:span text:style-name="T2">(41/31) </text:span> ϫⲉ ⲓ̅ⲥ̅ ϫⲉ ⲉⲩϣⲁⲛϫⲟⲟⲥ ⲛⲏⲧⲛ ϫⲉ ⲛⲧⲁ‐ <text:line-break/><text:span text:style-name="T1"> </text:span><text:span text:style-name="T2">(41/32) </text:span> ⲧⲉⲧⲛϣⲱⲡⲉ ⲉⲃⲟⲗ ⲧⲱⲛ ϫⲟⲟⲥ ⲛⲁⲩ <text:line-break/><text:span text:style-name="T1"> </text:span><text:span text:style-name="T2">(41/33) </text:span> ϫⲉ ⲛⲧⲁⲛⲉⲓ ⲉⲃⲟⲗ ϩⲙ ⲡⲟⲩⲟⲉⲓⲛ ⲡⲙⲁ <text:line-break/><text:soft-page-break/><text:span text:style-name="T1"> </text:span><text:span text:style-name="T2">(41/34) </text:span> ⲉⲛⲧⲁ ⲡⲟⲩⲟⲉⲓⲛ ϣⲱⲡⲉ ⲙ̣ⲙ̣ⲁ̣ⲩ ⲉⲃⲟⲗ <text:line-break/><text:span text:style-name="T1"> </text:span><text:span text:style-name="T2">(41/35) </text:span> ϩⲓⲧⲟⲟⲧϥ’ ⲟⲩⲁⲁⲧϥ’ ⲁϥⲱϩ[ⲉ ⲉⲣⲁⲧϥ] <text:line-break/><text:span text:style-name="T1"> </text:span><text:span text:style-name="T2">(42/1) </text:span> ⲁ̣ⲩⲱ ⲁϥⲟⲩⲱⲛϩ ⲉ̣[ⲃ]ⲟⲗ ϩ̣ⲛ ⲧⲟⲩϩⲓⲕⲱⲛ ⲉⲩ‐ <text:line-break/><text:span text:style-name="T1"> </text:span><text:span text:style-name="T2">(42/2) </text:span> ϣⲁϫⲟⲟⲥ ⲛⲏⲧⲛ ϫⲉ ⲛⲧⲱⲧⲛ ⲡⲉ ϫⲟⲟⲥ <text:line-break/><text:span text:style-name="T1"> </text:span><text:span text:style-name="T2">(42/3) </text:span> ϫⲉ ⲁⲛⲟⲛ ⲛⲉϥϣⲏⲣⲉ ⲁⲩⲱ ⲁⲛⲟⲛ ⲛⲥⲱⲧⲡ’ <text:line-break/><text:span text:style-name="T1"> </text:span><text:span text:style-name="T2">(42/4) </text:span> ⲙⲡⲉⲓⲱⲧ ⲉⲧⲟⲛϩ ⲉⲩϣⲁⲛϫⲛⲉ ⲧⲏⲩⲧⲛ <text:line-break/><text:span text:style-name="T1"> </text:span><text:span text:style-name="T2">(42/5) </text:span> ϫⲉ ⲟⲩ ⲡⲉ ⲡⲙⲁⲉⲓⲛ ⲙⲡⲉⲧⲛⲉⲓⲱⲧ’ ⲉⲧϩⲛ <text:line-break/><text:span text:style-name="T1"> </text:span><text:span text:style-name="T2">(42/6) </text:span> ⲧⲏⲩⲧⲛ ϫⲟⲟⲥ ⲉⲣⲟⲟⲩ ϫⲉ ⲟⲩⲕⲓⲙ ⲡⲉ ⲙⲛ <text:line-break/><text:span text:style-name="T1"> </text:span><text:span text:style-name="T2">(42/7) </text:span> ⲟⲩⲁⲛⲁⲡⲁⲩⲥⲓⲥ ⲡⲉϫⲁⲩ ⲛⲁϥ’ ⲛϭⲓ ⲛⲉϥⲙⲁ‐ <text:line-break/><text:span text:style-name="T1"> </text:span><text:span text:style-name="T2">(42/8) </text:span> ⲑⲏⲧⲏⲥ ϫⲉ ⲁϣ ⲛϩⲟⲟⲩ ⲉⲧⲁⲛⲁⲡⲁⲩⲥⲓⲥ ⲛ‐ <text:line-break/><text:span text:style-name="T1"> </text:span><text:span text:style-name="T2">(42/9) </text:span> ⲛⲉⲧⲙⲟⲟⲩⲧ’ ⲛⲁϣⲱⲡⲉ ⲁⲩⲱ ⲁϣ ⲛϩⲟⲟⲩ <text:line-break/><text:span text:style-name="T1"> </text:span><text:span text:style-name="T2">(42/10) </text:span> ⲉⲡⲕⲟⲥⲙⲟⲥ ⲃⲃⲣⲣⲉ ⲛⲏⲩ ⲡⲉϫⲁϥ ⲛⲁⲩ ϫⲉ <text:line-break/><text:span text:style-name="T1"> </text:span><text:span text:style-name="T2">(42/11) </text:span> ⲧⲏ ⲉⲧⲉⲧⲛϭⲱϣⲧ’ ⲉⲃⲟⲗ ϩⲏⲧⲥ ⲁⲥⲉⲓ ⲁⲗⲗⲁ <text:line-break/><text:span text:style-name="T1"> </text:span><text:span text:style-name="T2">(42/12) </text:span> ⲛⲧⲱⲧⲛ ⲧⲉⲧⲛⲥⲟⲟⲩⲛ ⲁⲛ ⲙⲙⲟⲥ ⲡⲉϫⲁⲩ <text:line-break/><text:span text:style-name="T1"> </text:span><text:span text:style-name="T2">(42/13) </text:span> ⲛⲁϥ ⲛϭⲓ ⲛⲉϥⲙⲁⲑⲏⲧⲏⲥ ϫⲉ ϫⲟⲩⲧⲁϥⲧⲉ <text:line-break/><text:span text:style-name="T1"> </text:span><text:span text:style-name="T2">(42/14) </text:span> ⲙⲡⲣⲟⲫⲏⲧⲏⲥ ⲁⲩϣⲁϫⲉ ϩⲙ ⲡⲓⲥⲣⲁⲏⲗ’ <text:line-break/><text:span text:style-name="T1"> </text:span><text:span text:style-name="T2">(42/15) </text:span> ⲁⲩⲱ ⲁⲩϣⲁϫⲉ ⲧⲏⲣⲟⲩ ϩⲣⲁⲓ̈ ⲛϩⲏⲧⲕ’ ⲡⲉ’‐ <text:line-break/><text:span text:style-name="T1"> </text:span><text:span text:style-name="T2">(42/16) </text:span> ϫⲁϥ ⲛⲁⲩ ϫⲉ ⲁⲧⲉⲧⲛⲕⲱ ⲙⲡⲉⲧⲟⲛϩ ⲙⲡⲉ‐ <text:line-break/><text:span text:style-name="T1"> </text:span><text:span text:style-name="T2">(42/17) </text:span> ⲧⲛⲙⲧⲟ ⲉⲃⲟⲗ ⲁⲩⲱ ⲁⲧⲉⲧⲛϣⲁϫⲉ ϩⲁ ⲛⲉⲧ‐ <text:line-break/><text:span text:style-name="T1"> </text:span><text:span text:style-name="T2">(42/18) </text:span> ⲙⲟⲟⲩⲧ’ ⲡⲉϫⲁⲩ ⲛⲁϥ ⲛϭⲓ ⲛⲉϥⲙⲁⲑⲏⲧⲏⲥ <text:line-break/><text:span text:style-name="T1"> </text:span><text:span text:style-name="T2">(42/19) </text:span> ϫⲉ ⲡⲥⲃⲃⲉ ⲣⲱⲫⲉⲗⲉⲓ ⲏ ⲙⲙⲟⲛ ⲡⲉϫⲁϥ’ <text:line-break/><text:span text:style-name="T1"> </text:span><text:span text:style-name="T2">(42/20) </text:span> ⲛⲁⲩ ϫⲉ ⲛⲉϥⲣⲱⲫⲉⲗⲉⲓ ⲛⲉ ⲡⲟⲩⲉⲓⲱⲧ’ ⲛⲁ‐ <text:line-break/><text:span text:style-name="T1"> </text:span><text:span text:style-name="T2">(42/21) </text:span> ϫⲡⲟⲟⲩ ⲉⲃⲟⲗ ϩⲛ ⲧⲟⲩⲙⲁⲁⲩ ⲉⲩⲥⲃⲃⲏⲩ <text:line-break/><text:span text:style-name="T1"> </text:span><text:span text:style-name="T2">(42/22) </text:span> ⲁⲗⲗⲁ ⲡⲥⲃⲃⲉ ⲙⲙⲉ ϩⲙ ⲡⲛ̅ⲁ̅ ⲁϥϭⲛ ϩⲏⲩ <text:line-break/><text:span text:style-name="T1"> </text:span><text:span text:style-name="T2">(42/23) </text:span> ⲧⲏⲣϥ’ ⲡⲉϫⲉ ⲓ̅ⲥ̅ ϫⲉ ϩⲛⲙⲁⲕⲁⲣⲓⲟⲥ ⲛⲉ ⲛϩⲏ‐ <text:line-break/><text:span text:style-name="T1"> </text:span><text:span text:style-name="T2">(42/24) </text:span> ⲕⲉ ϫⲉ ⲧⲱⲧⲛ ⲧⲉ ⲧⲙⲛⲧⲉⲣⲟ ⲛⲙⲡⲏⲩⲉ’ <text:line-break/><text:span text:style-name="T1"> </text:span><text:span text:style-name="T2">(42/25) </text:span> ⲡⲉϫⲉ ⲓ̅ⲥ̅ ϫⲉ ⲡⲉⲧⲁⲙⲉⲥⲧⲉ ⲡⲉϥ’ⲉⲓⲱⲧ’ <text:line-break/><text:span text:style-name="T1"> </text:span><text:span text:style-name="T2">(42/26) </text:span> ⲁⲛ’ ⲙⲛ ⲧⲉϥⲙⲁⲁⲩ ϥⲛⲁϣⲣ ⲙⲁⲑⲏⲧⲏⲥ ⲁⲛ <text:line-break/><text:span text:style-name="T1"> </text:span><text:span text:style-name="T2">(42/27) </text:span> ⲛⲁⲉⲓ’ ⲁⲩⲱ ⲛϥⲙⲉⲥⲧⲉ ⲛⲉϥ’ⲥⲛⲏⲩ ⲙⲛ <text:line-break/><text:span text:style-name="T1"> </text:span><text:span text:style-name="T2">(42/28) </text:span> ⲛⲉϥⲥⲱⲛⲉ ⲛϥϥⲉⲓ ⲙⲡⲉϥⲥxⲁⲟⲥ ⲛⲧⲁϩⲉ <text:line-break/><text:span text:style-name="T1"> </text:span><text:span text:style-name="T2">(42/29) </text:span> ϥⲛⲁϣⲱⲡⲉ ⲁⲛ ⲉϥⲟ ⲛⲁⲝⲓⲟⲥ ⲛⲁⲉⲓ ⲡⲉ‐ <text:line-break/><text:span text:style-name="T1"> </text:span><text:span text:style-name="T2">(42/30) </text:span> ϫⲉ ⲓ̅ⲥ̅ ϫⲉ ⲡⲉⲧⲁϩⲥⲟⲩⲱⲛ ⲡⲕⲟⲥⲙⲟⲥ ⲁϥ’‐ <text:line-break/><text:span text:style-name="T1"> </text:span><text:span text:style-name="T2">(42/31) </text:span> ϩⲉ ⲉⲩⲡⲧⲱⲙⲁ ⲁⲩⲱ ⲡⲉⲛⲧⲁϩϩⲉⲉ ⲁⲡⲧⲱ‐ <text:line-break/><text:span text:style-name="T1"> </text:span><text:span text:style-name="T2">(42/32) </text:span> ⲙⲁ ⲡⲕⲟⲥⲙⲟⲥ ⲙⲡϣⲁ ⲙⲙⲟϥ ⲁⲛ ⲡⲉ‐ <text:line-break/><text:span text:style-name="T1"> </text:span><text:span text:style-name="T2">(42/33) </text:span> ϫⲉ ⲓ̅ⲥ̅ ϫⲉ ⲧⲙⲛⲧⲉⲣⲟ ⲙⲡⲉⲓⲱⲧ’ ⲉⲥⲧⲛⲧⲱⲛ <text:line-break/><text:span text:style-name="T1"> </text:span><text:span text:style-name="T2">(42/34) </text:span> ⲁⲩⲣⲱⲙⲉ ⲉⲩⲛⲧⲁϥ ⲙⲙⲁⲩ ⲛⲛⲟⲩϭⲣⲟϭ <text:line-break/><text:span text:style-name="T1"> </text:span><text:span text:style-name="T2">(42/35) </text:span> ⲉ̣ⲛ̣[ⲁⲛⲟ]ⲩ̣ϥ’ ⲁⲡⲉϥϫⲁϫⲉ ⲉⲓ ⲛⲧⲟⲩϣⲏ’ <text:line-break/><text:span text:style-name="T1"> </text:span><text:span text:style-name="T2">(43/1) </text:span> ⲁϥⲥⲓⲧⲉ ⲛⲟⲩⲍⲓⲍⲁⲛⲓ̣[ⲟ]ⲛ ⲉ̣ϫ̣ⲛ ⲡⲉϭⲣⲟ[ϭ ⲉ]‐ <text:line-break/><text:span text:style-name="T1"> </text:span><text:span text:style-name="T2">(43/2) </text:span> ⲧⲛⲁⲛⲟⲩϥ’ ⲙⲡⲉ ⲡⲣⲱⲙⲉ ⲕⲟⲟⲩ ⲉϩⲱⲗⲉ <text:line-break/><text:span text:style-name="T1"> </text:span><text:span text:style-name="T2">(43/3) </text:span> ⲙⲡⲍⲓⲍⲁⲛⲓⲟⲛ ⲡⲉϫⲁϥ ⲛⲁⲩ ϫⲉ ⲙⲏⲡⲱⲥ <text:line-break/><text:span text:style-name="T1"> </text:span><text:span text:style-name="T2">(43/4) </text:span> ⲛⲧⲉⲧⲛⲃⲱⲕ’ ϫⲉ ⲉⲛⲁϩⲱⲗⲉ ⲙⲡⲍⲓⲍⲁⲛⲓⲟⲛ <text:line-break/><text:span text:style-name="T1"> </text:span><text:span text:style-name="T2">(43/5) </text:span> ⲛⲧⲉⲧⲛϩⲱⲗⲉ ⲙⲡⲥⲟⲩⲟ ⲛⲙⲙⲁϥ’ ϩⲙ ⲫⲟ‐ <text:line-break/><text:span text:style-name="T1"> </text:span><text:span text:style-name="T2">(43/6) </text:span> ⲟⲩ ⲅⲁⲣ ⲙⲡⲱϩ̅ⲥ̅ ⲛⲍⲓⲍⲁⲛⲓⲟⲛ ⲛⲁⲟⲩⲱⲛϩ <text:line-break/><text:span text:style-name="T1"> </text:span><text:span text:style-name="T2">(43/7) </text:span> ⲉⲃⲟⲗ’ ⲥⲉϩⲟⲗⲟⲩ ⲛⲥⲉⲣⲟⲕϩⲟⲩ ⲡⲉϫⲉ ⲓ̅ⲥ̅ <text:line-break/><text:span text:style-name="T1"> </text:span><text:span text:style-name="T2">(43/8) </text:span> ϫⲉ ⲟⲩⲙⲁⲕⲁⲣⲓⲟⲥ ⲡⲉ ⲡⲣⲱⲙⲉ ⲛⲧⲁϩϩⲓⲥⲉ <text:line-break/><text:span text:style-name="T1"> </text:span><text:span text:style-name="T2">(43/9) </text:span> ⲁϥϩⲉ ⲁⲡⲱⲛϩ ⲡⲉϫⲉ ⲓ̅ⲥ̅ ϫⲉ ϭⲱϣⲧ ⲛⲥⲁ ⲡⲉ‐ <text:line-break/><text:span text:style-name="T1"> </text:span><text:span text:style-name="T2">(43/10) </text:span> ⲧⲟⲛϩ ϩⲱⲥ ⲉⲧⲉⲧⲛⲟⲛϩ ϩⲓⲛⲁ ϫⲉ ⲛⲉⲧⲙⲙⲟⲩ <text:line-break/><text:soft-page-break/><text:span text:style-name="T1"> </text:span><text:span text:style-name="T2">(43/11) </text:span> ⲁⲩⲱ ⲛⲧⲉⲧⲛϣⲓⲛⲉ ⲉⲛⲁⲩ ⲉⲣⲟϥ ⲁⲩⲱ ⲧⲉⲧⲛⲁϣ‐ <text:line-break/><text:span text:style-name="T1"> </text:span><text:span text:style-name="T2">(43/12) </text:span> ϭⲙ ϭⲟⲙ ⲁⲛ ⲉⲛⲁⲩ 〈ⲁⲩⲛⲁⲩ〉 ⲁⲩⲥⲁⲙⲁⲣⲉⲓⲧⲏⲥ ⲉϥϥⲓ ⲛ‐ <text:line-break/><text:span text:style-name="T1"> </text:span><text:span text:style-name="T2">(43/13) </text:span> ⲛⲟⲩϩⲓⲉⲓⲃ’ ⲉϥⲃⲏⲕ’ ⲉϩⲟⲩⲛ ⲉϯⲟⲩⲇⲁⲓⲁ ⲡⲉ‐ <text:line-break/><text:span text:style-name="T1"> </text:span><text:span text:style-name="T2">(43/14) </text:span> ϫⲁϥ’ ⲛⲛⲉϥ’ⲙⲁⲑⲏⲧⲏⲥ ϫⲉ † ⲡⲏ ⲙⲡⲕⲱⲧⲉ <text:line-break/><text:span text:style-name="T1"> </text:span><text:span text:style-name="T2">(43/15) </text:span> ⲙⲡⲉϩⲓⲉⲓⲃ’ † ⲡⲉϫⲁⲩ ⲛⲁϥ ϫⲉⲕⲁⲁⲥ ⲉϥⲛⲁ‐ <text:line-break/><text:span text:style-name="T1"> </text:span><text:span text:style-name="T2">(43/16) </text:span> ⲙⲟⲟⲩⲧϥ’ ⲛϥⲟⲩⲟⲙϥ’ ⲡⲉϫⲁϥ ⲛⲁⲩ ϩⲱⲥ ⲉ‐ <text:line-break/><text:span text:style-name="T1"> </text:span><text:span text:style-name="T2">(43/17) </text:span> ϥⲟⲛϩ ϥⲛⲁⲟⲩⲟⲙϥ’ ⲁⲛ ⲁⲗⲗⲁ ⲉϥϣⲁⲙⲟ‐ <text:line-break/><text:span text:style-name="T1"> </text:span><text:span text:style-name="T2">(43/18) </text:span> ⲟⲩⲧϥ’ ⲛϥϣⲱⲡⲉ ⲛⲟⲩⲡⲧⲱⲙⲁ ⲡⲉϫⲁⲩ <text:line-break/><text:span text:style-name="T1"> </text:span><text:span text:style-name="T2">(43/19) </text:span> ϫⲉ ⲛⲕⲉⲥⲙⲟⲧ’ ϥⲛⲁϣⲁⲥ ⲁⲛ ⲡⲉϫⲁϥ ⲛⲁⲩ <text:line-break/><text:span text:style-name="T1"> </text:span><text:span text:style-name="T2">(43/20) </text:span> ϫⲉ ⲛⲧⲱⲧⲛ ϩⲱⲧ’ⲧⲏⲩⲧⲛ ϣⲓⲛⲉ ⲛⲥⲁ ⲟⲩ‐ <text:line-break/><text:span text:style-name="T1"> </text:span><text:span text:style-name="T2">(43/21) </text:span> ⲧⲟⲡⲟⲥ ⲛⲏⲧⲛ ⲉϩⲟⲩⲛ ⲉⲩⲁⲛⲁⲡⲁⲩⲥⲓⲥ <text:line-break/><text:span text:style-name="T1"> </text:span><text:span text:style-name="T2">(43/22) </text:span> ϫⲉⲕⲁⲁⲥ ⲛⲛⲉⲧⲛϣⲱⲡⲉ ⲙⲡⲧⲱⲙⲁ ⲛⲥⲉ‐ <text:line-break/><text:span text:style-name="T1"> </text:span><text:span text:style-name="T2">(43/23) </text:span> ⲟⲩⲱⲙ’ ⲧⲏⲩⲧⲛ ⲡⲉϫⲉ ⲓ̅ⲥ̅ ⲟⲩⲛ ⲥⲛⲁⲩ ⲛⲁⲙ‐ <text:line-break/><text:span text:style-name="T1"> </text:span><text:span text:style-name="T2">(43/24) </text:span> ⲧⲟⲛ’ ⲙⲙⲁⲩ ϩⲓ ⲟⲩϭⲗⲟϭ ⲡⲟⲩⲁ ⲛⲁⲙⲟⲩ ⲡⲟⲩ‐ <text:line-break/><text:span text:style-name="T1"> </text:span><text:span text:style-name="T2">(43/25) </text:span> ⲁ ⲛⲁⲱⲛϩ ⲡⲉϫⲉ ⲥⲁⲗⲱⲙⲏ ⲛⲧⲁⲕ’ ⲛⲓⲙ’ <text:line-break/><text:span text:style-name="T1"> </text:span><text:span text:style-name="T2">(43/26) </text:span> ⲡⲣⲱⲙⲉ † ϩⲱⲥ ⲉⲃⲟⲗ ϩⲛ ⲟⲩⲁ ⲁⲕⲧⲉⲗⲟ † ⲉϫⲙ <text:line-break/><text:span text:style-name="T1"> </text:span><text:span text:style-name="T2">(43/27) </text:span> ⲡⲁϭⲗⲟϭ ⲁⲩⲱ ⲁⲕ’ⲟⲩⲱⲙ ⲉⲃⲟⲗ ϩⲛ ⲧⲁ‐ <text:line-break/><text:span text:style-name="T1"> </text:span><text:span text:style-name="T2">(43/28) </text:span> ⲧⲣⲁⲡⲉⲍⲁ ⲡⲉϫⲉ ⲓ̅ⲥ̅ ⲛⲁⲥ ϫⲉ ⲁⲛⲟⲕ’ ⲡⲉ <text:line-break/><text:span text:style-name="T1"> </text:span><text:span text:style-name="T2">(43/29) </text:span> ⲡⲉⲧϣⲟⲟⲡ’ ⲉⲃⲟⲗ ϩⲙ ⲡⲉⲧ’ϣⲏϣ ⲁⲩϯ <text:line-break/><text:span text:style-name="T1"> </text:span><text:span text:style-name="T2">(43/30) </text:span> ⲛⲁⲉⲓ ⲉⲃⲟⲗ ϩⲛ ⲛⲁ ⲡⲁⲉⲓⲱⲧ’ 〈‐‐‐〉 ⲁⲛⲟⲕ’ ⲧⲉⲕ’‐ <text:line-break/><text:span text:style-name="T1"> </text:span><text:span text:style-name="T2">(43/31) </text:span> ⲙⲁⲑⲏⲧⲏⲥ 〈‐‐‐〉 ⲉⲧⲃⲉ ⲡⲁⲉⲓ ϯϫⲱ ⲙⲙⲟⲥ ϫⲉ <text:line-break/><text:span text:style-name="T1"> </text:span><text:span text:style-name="T2">(43/32) </text:span> ϩⲟⲧⲁⲛ ⲉϥϣⲁϣⲱⲡⲉ † ⲉϥϣⲏϥ’ ϥⲛⲁⲙⲟⲩϩ <text:line-break/><text:span text:style-name="T1"> </text:span><text:span text:style-name="T2">(43/33) </text:span> ⲟⲩⲟⲉⲓⲛ ϩⲟⲧⲁⲛ ⲇⲉ ⲉϥϣⲁⲛϣⲱⲡⲉ ⲉϥ‐ <text:line-break/><text:span text:style-name="T1"> </text:span><text:span text:style-name="T2">(43/34) </text:span> ⲡⲏϣ ϥⲛⲁⲙⲟⲩϩ ⲛⲕⲁⲕⲉ ⲡⲉϫⲉ ⲓ̅ⲥ̅ ϫⲉ ⲉⲓ̈‐ <text:line-break/><text:span text:style-name="T1"> </text:span><text:span text:style-name="T2">(43/35) </text:span> ϫⲱ ⲛⲛⲁⲙⲩⲥⲧⲏⲣⲓⲟⲛ ⲛⲛⲉ̣[ⲧⲙⲡϣⲁ] ⲛ̣‐ <text:line-break/><text:span text:style-name="T1"> </text:span><text:span text:style-name="T2">(44/1) </text:span> [ⲛⲁ]ⲙⲩⲥⲧⲏⲣⲓⲟⲛ ⲡⲉ̣[ⲧ]ⲉ ⲧⲉⲕ’ⲟⲩⲛⲁⲙ ⲛⲁⲁϥ <text:line-break/><text:span text:style-name="T1"> </text:span><text:span text:style-name="T2">(44/2) </text:span> ⲙⲛⲧⲣⲉ ⲧⲉⲕϩⲃⲟⲩⲣ’ ⲉⲓⲙⲉ ϫⲉ ⲉⲥⲣ ⲟⲩ ⲡⲉϫⲉ ⲓ̅ⲥ̅ <text:line-break/><text:span text:style-name="T1"> </text:span><text:span text:style-name="T2">(44/3) </text:span> ϫⲉ ⲛⲉⲩⲛ ⲟⲩⲣⲱⲙⲉ ⲙⲡⲗⲟⲩⲥⲓⲟⲥ ⲉⲩⲛⲧⲁϥ ⲙ‐ <text:line-break/><text:span text:style-name="T1"> </text:span><text:span text:style-name="T2">(44/4) </text:span> ⲙⲁⲩ ⲛϩⲁϩ ⲛⲭⲣⲏⲙⲁ ⲡⲉϫⲁϥ ϫⲉ ϯⲛⲁⲣⲭⲣⲱ ⲛ‐ <text:line-break/><text:span text:style-name="T1"> </text:span><text:span text:style-name="T2">(44/5) </text:span> ⲛⲁⲭⲣⲏⲙⲁ ϫⲉⲕⲁⲁⲥ ⲉⲉⲓⲛⲁϫⲟ ⲛⲧⲁⲱ⟦ϩ⟧ⲥϩ <text:line-break/><text:span text:style-name="T1"> </text:span><text:span text:style-name="T2">(44/6) </text:span> ⲛⲧⲁⲧⲱϭⲉ ⲛⲧⲁⲙⲟⲩϩ ⲛⲛⲁⲉϩⲱⲣ ⲛⲕⲁⲣ’‐ <text:line-break/><text:span text:style-name="T1"> </text:span><text:span text:style-name="T2">(44/7) </text:span> ⲡⲟⲥ ϣⲓⲛⲁ ϫⲉ ⲛⲓⲣ ϭⲣⲱϩ ⲗⲗⲁⲁⲩ ⲛⲁⲉⲓ ⲛⲉ <text:line-break/><text:span text:style-name="T1"> </text:span><text:span text:style-name="T2">(44/8) </text:span> ⲛⲉϥⲙⲉⲉⲩⲉ ⲉⲣⲟⲟⲩ ϩⲙ ⲡⲉϥϩⲏⲧ’ ⲁⲩⲱ ϩⲛ <text:line-break/><text:span text:style-name="T1"> </text:span><text:span text:style-name="T2">(44/9) </text:span> ⲧⲟⲩϣⲏ ⲉⲧⲙⲙⲁⲩ ⲁϥⲙⲟⲩ ⲡⲉⲧⲉⲩⲙ ⲙⲁϫⲉ <text:line-break/><text:span text:style-name="T1"> </text:span><text:span text:style-name="T2">(44/10) </text:span> ⲙⲙⲟϥ’ ⲙⲁⲣⲉϥ’ⲥⲱⲧⲙ ⲡⲉϫⲉ ⲓ̅ⲥ̅ ϫⲉ ⲟⲩⲣⲱ‐ <text:line-break/><text:span text:style-name="T1"> </text:span><text:span text:style-name="T2">(44/11) </text:span> ⲙⲉ ⲛⲉⲩⲛⲧⲁϥ ϩⲛϣⲙⲙⲟ ⲁⲩⲱ ⲛⲧⲁⲣⲉϥⲥⲟⲃ‐ <text:line-break/><text:span text:style-name="T1"> </text:span><text:span text:style-name="T2">(44/12) </text:span> ⲧⲉ ⲙⲡⲇⲓⲡⲛⲟⲛ ⲁϥϫⲟⲟⲩ ⲙⲡⲉϥϩⲙϩ̅ⲁ̅ⲗ̅ ϣⲓ‐ <text:line-break/><text:span text:style-name="T1"> </text:span><text:span text:style-name="T2">(44/13) </text:span> ⲛⲁ ⲉϥⲛⲁⲧⲱϩⲙ ⲛⲛϣⲙⲙⲟⲉⲓ ⲁϥⲃⲱⲕ’ ⲙ‐ <text:line-break/><text:span text:style-name="T1"> </text:span><text:span text:style-name="T2">(44/14) </text:span> ⲡϣⲟⲣⲡ’ ⲡⲉϫⲁϥ ⲛⲁϥ’ ϫⲉ ⲡⲁϫⲟⲉⲓⲥ ⲧⲱϩⲙ <text:line-break/><text:span text:style-name="T1"> </text:span><text:span text:style-name="T2">(44/15) </text:span> ⲙⲙⲟⲕ’ ⲡⲉϫⲁϥ ϫⲉ ⲟⲩⲛⲧⲁⲉⲓ ϩⲛϩⲟⲙⲧ’ <text:line-break/><text:span text:style-name="T1"> </text:span><text:span text:style-name="T2">(44/16) </text:span> ⲁϩⲉⲛⲉⲙⲡⲟⲣⲟⲥ ⲥⲉⲛⲛⲏⲩ ϣⲁⲣⲟⲉⲓ ⲉⲣⲟⲩϩⲉ <text:line-break/><text:span text:style-name="T1"> </text:span><text:span text:style-name="T2">(44/17) </text:span> ϯⲛⲁⲃⲱⲕ’ ⲛⲧⲁⲟⲩⲉϩ ⲥⲁϩⲛⲉ ⲛⲁⲩ ϯⲣⲡⲁⲣⲁⲓ‐ <text:line-break/><text:span text:style-name="T1"> </text:span><text:span text:style-name="T2">(44/18) </text:span> ⲧⲉⲓ ⲙⲡⲇⲓⲡⲛⲟⲛ ⲁϥⲃⲱⲕ’ ϣⲁ ⲕⲉⲟⲩⲁ ⲡⲉ‐ <text:line-break/><text:span text:style-name="T1"> </text:span><text:span text:style-name="T2">(44/19) </text:span> ϫⲁϥ ⲛⲁϥ’ ϫⲉ ⲁⲡⲁϫⲟⲉⲓⲥ ⲧⲱϩⲙ ⲙⲙⲟⲕ’ <text:line-break/><text:span text:style-name="T1"> </text:span><text:span text:style-name="T2">(44/20) </text:span> ⲡⲉϫⲁϥ ⲛⲁϥ ϫⲉ ⲁⲉⲓⲧⲟⲟⲩ ⲟⲩⲏⲉⲓ ⲁⲩⲱ ⲥⲉ‐ <text:line-break/><text:span text:style-name="T1"> </text:span><text:span text:style-name="T2">(44/21) </text:span> ⲣⲁⲓⲧⲉⲓ ⲙⲙⲟⲉⲓ ⲛⲟⲩϩⲏⲙⲉⲣⲁ ϯⲛⲁⲥⲣϥⲉ ⲁⲛ <text:line-break/><text:span text:style-name="T1"> </text:span><text:span text:style-name="T2">(44/22) </text:span> ⲁϥⲉⲓ ϣⲁ ⲕⲉⲟⲩⲁ ⲡⲉϫⲁϥ ⲛⲁϥ’ ϫⲉ ⲡⲁϫⲟ’‐ <text:line-break/><text:soft-page-break/><text:span text:style-name="T1"> </text:span><text:span text:style-name="T2">(44/23) </text:span> ⲉⲓⲥ ⲧⲱϩⲙ ⲙⲙⲟⲕ’ ⲡⲉϫⲁϥ ⲛⲁϥ ϫⲉ ⲡⲁϣⲃⲏⲣ’ <text:line-break/><text:span text:style-name="T1"> </text:span><text:span text:style-name="T2">(44/24) </text:span> ⲛⲁⲣ ϣⲉⲗⲉⲉⲧ ⲁⲩⲱ ⲁⲛⲟⲕ’ ⲉⲧⲛⲁⲣ ⲇⲓⲡⲛⲟⲛ <text:line-break/><text:span text:style-name="T1"> </text:span><text:span text:style-name="T2">(44/25) </text:span> ϯⲛⲁϣⲓ ⲁⲛ ϯⲣⲡⲁⲣⲁⲓⲧⲉⲓ ⲙⲡⲇⲓⲡⲛⲟⲛ’ ⲁϥ’‐ <text:line-break/><text:span text:style-name="T1"> </text:span><text:span text:style-name="T2">(44/26) </text:span> ⲃⲱⲕ’ ϣⲁ ⲕⲉⲟⲩⲁ ⲡⲉϫⲁϥ ⲛⲁϥ ϫⲉ ⲡⲁϫⲟⲉⲓⲥ <text:line-break/><text:span text:style-name="T1"> </text:span><text:span text:style-name="T2">(44/27) </text:span> ⲧⲱϩⲙ ⲙⲙⲟⲕ’ ⲡⲉϫⲁϥ ⲛⲁϥ’ ϫⲉ ⲁⲉⲓⲧⲟⲟⲩ ⲛ‐ <text:line-break/><text:span text:style-name="T1"> </text:span><text:span text:style-name="T2">(44/28) </text:span> ⲟⲩⲕⲱⲙⲏ ⲉⲉⲓⲃⲏⲕ’ ⲁϫⲓ ⲛϣⲱⲙ ϯⲛⲁϣⲓ <text:line-break/><text:span text:style-name="T1"> </text:span><text:span text:style-name="T2">(44/29) </text:span> ⲁⲛ ϯⲣⲡⲁⲣⲁⲓⲧⲉⲓ ⲁϥⲉⲓ ⲛϭⲓ ⲡϩⲙϩ̅ⲁ̅ⲗ̅ ⲁϥϫⲟ‐ <text:line-break/><text:span text:style-name="T1"> </text:span><text:span text:style-name="T2">(44/30) </text:span> ⲟⲥ ⲁⲡⲉϥϫⲟⲉⲓⲥ ϫⲉ ⲛⲉⲛⲧⲁⲕ’ⲧⲁϩⲙⲟⲩ ⲁ‐ <text:line-break/><text:span text:style-name="T1"> </text:span><text:span text:style-name="T2">(44/31) </text:span> ⲡⲇⲓⲡⲛⲟⲛ ⲁⲩⲡⲁⲣⲁⲓⲧⲉⲓ ⲡⲉϫⲉ ⲡϫⲟⲉⲓⲥ ⲙ‐ <text:line-break/><text:span text:style-name="T1"> </text:span><text:span text:style-name="T2">(44/32) </text:span> ⲡⲉϥϩⲙϩⲁ̅ⲗ̅ ϫⲉ ⲃⲱⲕ’ ⲉⲡⲥⲁ ⲛⲃⲟⲗ ⲁⲛϩⲓⲟ‐ <text:line-break/><text:span text:style-name="T1"> </text:span><text:span text:style-name="T2">(44/33) </text:span> ⲟⲩⲉ ⲛⲉⲧⲕⲛⲁϩⲉ ⲉⲣⲟⲟⲩ ⲉⲛⲓⲟⲩ ϫⲉⲕⲁⲁⲥ <text:line-break/><text:span text:style-name="T1"> </text:span><text:span text:style-name="T2">(44/34) </text:span> ⲉⲩⲛⲁⲣⲇⲓⲡⲛⲉⲓ ⲛⲣⲉϥⲧⲟⲟⲩ ⲙⲛ ⲛⲉϣⲟ‐ <text:line-break/><text:span text:style-name="T1"> </text:span><text:span text:style-name="T2">(44/35) </text:span> ⲧ̣[ⲉ ⲥⲉⲛⲁⲃ]ⲱ̣ⲕ ⲁⲛ’ ⲉϩⲟⲩⲛ’ ⲉⲛⲧⲟⲡⲟⲥ ⲙⲡⲁⲓ̈ⲱⲧ’ <text:line-break/><text:span text:style-name="T1"> </text:span><text:span text:style-name="T2">(45/1) </text:span> ⲡⲉϫⲁϥ ϫⲉ ⲟⲩⲣⲱⲙⲉ ⲛⲭⲣⲏ[ⲥⲧⲟ]ⲥ ⲛⲉⲩⲛ̣ⲧ̣[ⲁϥ] <text:line-break/><text:span text:style-name="T1"> </text:span><text:span text:style-name="T2">(45/2) </text:span> ⲛⲟⲩⲙⲁ ⲛⲉⲗⲟⲟⲗⲉ ⲁϥⲧⲁ’ⲁϥ ⲛϩ̣ⲛⲟⲩⲟⲉⲓⲉ <text:line-break/><text:span text:style-name="T1"> </text:span><text:span text:style-name="T2">(45/3) </text:span> ϣⲓⲛⲁ ⲉⲩⲛⲁⲣ ϩⲱⲃ’ ⲉⲣⲟϥ’ ⲛϥϫⲓ ⲙⲡⲉϥⲕⲁⲣ’‐ <text:line-break/><text:span text:style-name="T1"> </text:span><text:span text:style-name="T2">(45/4) </text:span> ⲡⲟⲥ ⲛⲧⲟⲟⲧⲟⲩ ⲁϥϫⲟⲟⲩ ⲙⲡⲉϥϩⲙϩ̅ⲁ̅ⲗ̅ ϫⲉ‐ <text:line-break/><text:span text:style-name="T1"> </text:span><text:span text:style-name="T2">(45/5) </text:span> ⲕⲁⲁⲥ ⲉⲛⲟⲩⲟⲉⲓⲉ ⲛⲁϯ ⲛⲁϥ’ ⲙⲡⲕⲁⲣⲡⲟⲥ ⲙ‐ <text:line-break/><text:span text:style-name="T1"> </text:span><text:span text:style-name="T2">(45/6) </text:span> ⲡⲙⲁ ⲛⲉⲗⲟⲟⲗⲉ ⲁⲩⲉⲙⲁϩⲧⲉ ⲙⲡⲉϥϩⲙϩ̅ⲁ̅ⲗ̅ <text:line-break/><text:span text:style-name="T1"> </text:span><text:span text:style-name="T2">(45/7) </text:span> ⲁⲩϩⲓⲟⲩⲉ ⲉⲣⲟϥ’ ⲛⲉ ⲕⲉⲕⲟⲩⲉⲓ ⲡⲉ ⲛⲥⲉⲙⲟⲟⲩⲧϥ’ <text:line-break/><text:span text:style-name="T1"> </text:span><text:span text:style-name="T2">(45/8) </text:span> ⲁⲡϩⲙϩ̅ⲁ̅ⲗ̅ ⲃⲱⲕ’ ⲁϥϫⲟⲟⲥ ⲉⲡⲉϥϫⲟⲉⲓⲥ ⲡⲉ‐ <text:line-break/><text:span text:style-name="T1"> </text:span><text:span text:style-name="T2">(45/9) </text:span> ϫⲉ ⲡⲉϥϫⲟⲉⲓⲥ ϫⲉ ⲙⲉϣⲁⲕ’ † ⲙⲡⲉϥ’ⲥⲟⲩⲱ‐ <text:line-break/><text:span text:style-name="T1"> </text:span><text:span text:style-name="T2">(45/10) </text:span> ⲛⲟⲩ ⲁϥϫⲟⲟⲩ ⲛⲕⲉϩⲙϩ̅ⲁ̅ⲗ̅ ⲁⲛⲟⲩⲟⲉⲓⲉ ϩⲓ‐ <text:line-break/><text:span text:style-name="T1"> </text:span><text:span text:style-name="T2">(45/11) </text:span> ⲟⲩⲉ ⲉⲡⲕⲉⲟⲩⲁ ⲧⲟⲧⲉ ⲁⲡϫⲟⲉⲓⲥ ϫⲟⲟⲩ ⲙ‐ <text:line-break/><text:span text:style-name="T1"> </text:span><text:span text:style-name="T2">(45/12) </text:span> ⲡⲉϥϣⲏⲣⲉ ⲡⲉϫⲁϥ’ ϫⲉ ⲙⲉϣⲁⲕ’ ⲥⲉⲛⲁϣⲓⲡⲉ <text:line-break/><text:span text:style-name="T1"> </text:span><text:span text:style-name="T2">(45/13) </text:span> ϩⲏⲧϥ’ ⲙⲡⲁϣⲏⲣⲉ ⲁⲛ’ⲟⲩⲟⲉⲓⲉ ⲉⲧⲙⲙⲁⲩ ⲉⲡⲉⲓ <text:line-break/><text:span text:style-name="T1"> </text:span><text:span text:style-name="T2">(45/14) </text:span> ⲥⲉⲥⲟⲟⲩⲛ ϫⲉ ⲛⲧⲟϥ ⲡⲉ ⲡⲉⲕⲗⲏⲣⲟⲛⲟⲙⲟⲥ <text:line-break/><text:span text:style-name="T1"> </text:span><text:span text:style-name="T2">(45/15) </text:span> ⲙⲡⲙⲁ ⲛⲉⲗⲟⲟⲗⲉ ⲁⲩϭⲟⲡϥ’ ⲁⲩⲙⲟⲟⲩⲧϥ’ <text:line-break/><text:span text:style-name="T1"> </text:span><text:span text:style-name="T2">(45/16) </text:span> ⲡⲉⲧⲉⲩⲙ ⲙⲁⲁϫⲉ ⲙⲙⲟϥ’ ⲙⲁⲣⲉϥ’ⲥⲱⲧⲙ ⲡⲉ‐ <text:line-break/><text:span text:style-name="T1"> </text:span><text:span text:style-name="T2">(45/17) </text:span> ϫⲉ ⲓ̅ⲥ̅ ϫⲉ ⲙⲁⲧⲥⲉⲃⲟⲉⲓ ⲉⲡⲱⲛⲉ ⲡⲁⲉⲓ ⲛⲧⲁⲩ‐ <text:line-break/><text:span text:style-name="T1"> </text:span><text:span text:style-name="T2">(45/18) </text:span> ⲥⲧⲟϥ’ ⲉⲃⲟⲗ’ ⲛϭⲓ ⲛⲉⲧ’ⲕⲱⲧ’ ⲛⲧⲟϥ ⲡⲉ ⲡⲱⲱ‐ <text:line-break/><text:span text:style-name="T1"> </text:span><text:span text:style-name="T2">(45/19) </text:span> ⲛⲉ ⲛⲕⲱϩ ⲡⲉϫⲉ ⲓ̅ⲥ̅ ϫⲉ ⲡⲉⲧⲥⲟⲟⲩⲛ ⲙⲡⲧⲏⲣϥ’ <text:line-break/><text:span text:style-name="T1"> </text:span><text:span text:style-name="T2">(45/20) </text:span> ⲉϥⲣ ϭⲣⲱϩ ⲟⲩⲁⲁϥ 〈ϥ〉ⲣ ϭⲣⲱϩ ⲙⲡⲙⲁ ⲧⲏⲣϥ’ <text:line-break/><text:span text:style-name="T1"> </text:span><text:span text:style-name="T2">(45/21) </text:span> ⲡⲉϫⲉ ⲓ̅ⲥ̅ ϫⲉ ⲛⲧⲱⲧⲛ ϩⲙⲙⲁⲕⲁⲣⲓⲟⲥ ϩⲟⲧⲁⲛ <text:line-break/><text:span text:style-name="T1"> </text:span><text:span text:style-name="T2">(45/22) </text:span> ⲉⲩϣⲁⲛⲙⲉⲥⲧⲉ ⲧⲏⲩⲧⲛ ⲛⲥⲉⲣⲇⲓⲱⲕⲉ ⲙ‐ <text:line-break/><text:span text:style-name="T1"> </text:span><text:span text:style-name="T2">(45/23) </text:span> ⲙⲱⲧⲛ ⲁⲩⲱ ⲥⲉⲛⲁϩⲉ ⲁⲛ ⲉⲧⲟⲡⲟⲥ ϩⲙ ⲡⲙⲁ <text:line-break/><text:span text:style-name="T1"> </text:span><text:span text:style-name="T2">(45/24) </text:span> ⲉⲛⲧⲁⲩⲇⲓⲱⲕⲉ ⲙⲙⲱⲧⲛ ϩⲣⲁⲓ̈ ⲛϩⲏⲧϥ’ ⲡⲉ‐ <text:line-break/><text:span text:style-name="T1"> </text:span><text:span text:style-name="T2">(45/25) </text:span> ϫⲉ ⲓ̅ⲥ̅ ϩⲙⲙⲁⲕⲁⲣⲓⲟⲥ ⲛⲉ ⲛⲁⲉⲓ ⲛⲧⲁⲩⲇⲓⲱⲕⲉ <text:line-break/><text:span text:style-name="T1"> </text:span><text:span text:style-name="T2">(45/26) </text:span> ⲙⲙⲟⲟⲩ ϩⲣⲁⲓ̈ ϩⲙ ⲡⲟⲩϩⲏⲧ’ ⲛⲉⲧⲙⲙⲁⲩ’ <text:line-break/><text:span text:style-name="T1"> </text:span><text:span text:style-name="T2">(45/27) </text:span> ⲛⲉⲛⲧⲁϩⲥⲟⲩⲱⲛ ⲡⲉⲓⲱⲧ’ ϩⲛ ⲟⲩⲙⲉ ϩⲙ‐ <text:line-break/><text:span text:style-name="T1"> </text:span><text:span text:style-name="T2">(45/28) </text:span> ⲙⲁⲕⲁⲣⲓⲟⲥ ⲛⲉⲧϩⲕⲁⲉⲓⲧ’ ϣⲓⲛⲁ ⲉⲩⲛⲁ‐ <text:line-break/><text:span text:style-name="T1"> </text:span><text:span text:style-name="T2">(45/29) </text:span> ⲧⲥⲓⲟ ⲛⲑϩⲏ ⲙⲡⲉⲧⲟⲩⲱϣ ⲡⲉϫⲉ ⲓ̅ⲥ̅ ϩⲟ‐ <text:line-break/><text:span text:style-name="T1"> </text:span><text:span text:style-name="T2">(45/30) </text:span> ⲧⲁⲛ ⲉⲧⲉⲧⲛϣⲁϫⲡⲉ ⲡⲏ ϩⲛ ⲧⲏⲩⲧⲛ ⲡⲁⲓ̈ <text:line-break/><text:span text:style-name="T1"> </text:span><text:span text:style-name="T2">(45/31) </text:span> ⲉⲧⲉⲩⲛⲧⲏⲧⲛ̅ϥ̅ ϥⲛⲁⲧⲟⲩϫⲉ ⲧⲏⲩⲧⲛ ⲉϣⲱ‐ <text:line-break/><text:span text:style-name="T1"> </text:span><text:span text:style-name="T2">(45/32) </text:span> ⲡⲉ ⲙⲛⲧⲏⲧⲛ ⲡⲏ ϩⲛ ⲧ̣[ⲏ]ⲩⲧⲛ ⲡⲁⲉⲓ ⲉⲧⲉ <text:line-break/><text:span text:style-name="T1"> </text:span><text:span text:style-name="T2">(45/33) </text:span> ⲙⲛⲧⲏⲧⲛ̅ϥ̅ ϩⲛ ⲧⲏⲛⲉ ϥ[ⲛⲁ]ⲙ̣ⲟⲩⲧ’ ⲧⲏⲛⲉ <text:line-break/><text:span text:style-name="T1"> </text:span><text:span text:style-name="T2">(45/34) </text:span> ⲡⲉϫⲉ ⲓ̅ⲥ̅ ϫⲉ ϯⲛⲁϣⲟⲣ[ϣⲣ ⲙⲡⲉⲉ]ⲓ̣ⲏⲉⲓ <text:line-break/><text:soft-page-break/><text:span text:style-name="T1"> </text:span><text:span text:style-name="T2">(45/35) </text:span> ⲁⲩⲱ ⲙⲛ ⲗⲁⲁⲩ ⲛⲁϣⲕⲟⲧϥ.[........] <text:line-break/><text:span text:style-name="T1"> </text:span><text:span text:style-name="T2">(46/1) </text:span> [ⲡⲉ]ϫ̣ⲉ̣ ⲟ̣ⲩⲣ̣[ⲱⲙ]ⲉ̣ ⲛⲁ̣ϥ ϫⲉ ϫⲟⲟⲥ ⲛⲛⲁⲥⲛⲏⲩ <text:line-break/><text:span text:style-name="T1"> </text:span><text:span text:style-name="T2">(46/2) </text:span> ϣⲓⲛⲁ ⲉⲩⲛⲁ̣ⲡⲱϣⲉ ⲛⲛϩⲛⲁⲁⲩ ⲙⲡⲁⲉⲓⲱⲧ’ <text:line-break/><text:span text:style-name="T1"> </text:span><text:span text:style-name="T2">(46/3) </text:span> ⲛⲙⲙⲁⲉⲓ ⲡⲉϫⲁϥ ⲛⲁϥ’ ϫⲉ ⲱ ⲡⲣⲱⲙⲉ ⲛⲓⲙ <text:line-break/><text:span text:style-name="T1"> </text:span><text:span text:style-name="T2">(46/4) </text:span> ⲡⲉ ⲛⲧⲁϩⲁⲁⲧ’ ⲛⲣⲉϥⲡⲱϣⲉ ⲁϥⲕⲟⲧϥ ⲁ’‐ <text:line-break/><text:span text:style-name="T1"> </text:span><text:span text:style-name="T2">(46/5) </text:span> ⲛⲉϥⲙⲁⲑⲏⲧⲏⲥ ⲡⲉϫⲁϥ ⲛⲁⲩ ϫⲉ ⲙⲏ ⲉⲉⲓ‐ <text:line-break/><text:span text:style-name="T1"> </text:span><text:span text:style-name="T2">(46/6) </text:span> ϣⲟⲟⲡ’ ⲛⲣⲉϥ’ⲡⲱϣⲉ ⲡⲉϫⲉ ⲓ̅ⲥ̅ ϫⲉ ⲡⲱϩⲥ <text:line-break/><text:span text:style-name="T1"> </text:span><text:span text:style-name="T2">(46/7) </text:span> ⲙⲉⲛ ⲛⲁϣⲱϥ’ ⲛⲉⲣⲅⲁⲧⲏⲥ ⲇⲉ ⲥⲟⲃⲕ’ ⲥⲟⲡⲥ <text:line-break/><text:span text:style-name="T1"> </text:span><text:span text:style-name="T2">(46/8) </text:span> ⲇⲉ ⲙⲡϫⲟⲉⲓⲥ ϣⲓⲛⲁ ⲉϥⲛⲁⲛⲉϫ’ ⲉⲣⲅⲁⲧⲏⲥ <text:line-break/><text:span text:style-name="T1"> </text:span><text:span text:style-name="T2">(46/9) </text:span> ⲉⲃⲟⲗ’ ⲉⲡⲱϩ̅ⲥ̅ ⲡⲉϫⲁϥ ϫⲉ ⲡϫⲟⲉⲓⲥ ⲟⲩⲛ <text:line-break/><text:span text:style-name="T1"> </text:span><text:span text:style-name="T2">(46/10) </text:span> ϩⲁϩ ⲙⲡⲕⲱⲧⲉ ⲛⲧϫⲱⲧⲉ ⲙⲛ ⲗⲁⲁⲩ ⲇⲉ ϩⲛ <text:line-break/><text:span text:style-name="T1"> </text:span><text:span text:style-name="T2">(46/11) </text:span> † ⲧϣⲱⲛⲉ’ ⲡⲉϫⲉ ⲓ̅ⲥ̅ ⲟⲩⲛ ϩⲁϩ ⲁϩⲉⲣⲁⲧⲟⲩ <text:line-break/><text:span text:style-name="T1"> </text:span><text:span text:style-name="T2">(46/12) </text:span> ϩⲓⲣⲙ ⲡⲣⲟ ⲁⲗⲗⲁ ⲙⲙⲟⲛⲁⲭⲟⲥ ⲛⲉⲧⲛⲁⲃⲱⲕ’ <text:line-break/><text:span text:style-name="T1"> </text:span><text:span text:style-name="T2">(46/13) </text:span> ⲉϩⲟⲩⲛ ⲉⲡⲙⲁ ⲛϣⲉⲗⲉⲉⲧ’ ⲡⲉϫⲉ ⲓ̅ⲥ̅ ϫⲉ <text:line-break/><text:span text:style-name="T1"> </text:span><text:span text:style-name="T2">(46/14) </text:span> ⲧⲙⲛⲧⲉⲣⲟ ⲙⲡⲉⲓⲱⲧ’ ⲉⲥⲧⲛⲧⲱⲛ ⲁⲩⲣⲱⲙⲉ <text:line-break/><text:span text:style-name="T1"> </text:span><text:span text:style-name="T2">(46/15) </text:span> ⲛⲉϣⲱⲱⲧ’ ⲉⲩⲛⲧⲁϥ’ ⲙⲙⲁⲩ ⲛⲟⲩⲫⲟⲣⲧⲓ‐ <text:line-break/><text:span text:style-name="T1"> </text:span><text:span text:style-name="T2">(46/16) </text:span> ⲟⲛ ⲉⲁϥϩⲉ ⲁⲩⲙⲁⲣⲅⲁⲣⲓⲧⲏⲥ ⲡⲉϣⲱⲧ’ <text:line-break/><text:span text:style-name="T1"> </text:span><text:span text:style-name="T2">(46/17) </text:span> ⲉⲧⲙⲙⲁⲩ ⲟⲩⲥⲁⲃⲉ ⲡⲉ ⲁϥϯ ⲡⲉⲫⲟⲣⲧⲓⲟⲛ <text:line-break/><text:span text:style-name="T1"> </text:span><text:span text:style-name="T2">(46/18) </text:span> ⲉⲃⲟⲗ ⲁϥⲧⲟⲟⲩ ⲛⲁϥ’ ⲙⲡⲓⲙⲁⲣⲅⲁⲣⲓⲧⲏⲥ <text:line-break/><text:span text:style-name="T1"> </text:span><text:span text:style-name="T2">(46/19) </text:span> ⲟⲩⲱⲧ’ ⲛⲧⲱⲧⲛ ϩⲱⲧ’ⲧⲏⲩⲧⲛ ϣⲓⲛⲉ ⲛ‐ <text:line-break/><text:span text:style-name="T1"> </text:span><text:span text:style-name="T2">(46/20) </text:span> ⲥⲁ ⲡ{ⲉϥ}ⲉϩⲟ ⲉⲙⲁϥⲱϫⲛ ⲉϥⲙⲏⲛ’ ⲉⲃⲟⲗ <text:line-break/><text:span text:style-name="T1"> </text:span><text:span text:style-name="T2">(46/21) </text:span> ⲡⲙⲁ ⲉⲙⲁⲣⲉ ϫⲟⲟⲗⲉⲥ ⲧϩⲛⲟ ⲉϩⲟⲩⲛ’ ⲉⲙⲁⲩ <text:line-break/><text:span text:style-name="T1"> </text:span><text:span text:style-name="T2">(46/22) </text:span> ⲉⲟⲩⲱⲙ’ ⲟⲩⲇⲉ ⲙⲁⲣⲉ ϥϥⲛⲧ ⲧⲁⲕⲟ ⲡⲉϫⲉ <text:line-break/><text:span text:style-name="T1"> </text:span><text:span text:style-name="T2">(46/23) </text:span> ⲓ̅ⲥ̅ ϫⲉ ⲁⲛⲟⲕ ⲡⲉ ⲡⲟⲩⲟⲉⲓⲛ ⲡⲁⲉⲓ ⲉⲧϩⲓ‐ <text:line-break/><text:span text:style-name="T1"> </text:span><text:span text:style-name="T2">(46/24) </text:span> ϫⲱⲟⲩ ⲧⲏⲣⲟⲩ ⲁⲛⲟⲕ’ ⲡⲉ ⲡⲧⲏⲣϥ’ ⲛⲧⲁ <text:line-break/><text:span text:style-name="T1"> </text:span><text:span text:style-name="T2">(46/25) </text:span> ⲡⲧⲏⲣϥ’ ⲉⲓ ⲉⲃⲟⲗ ⲛϩⲏⲧ’ ⲁⲩⲱ ⲛⲧⲁ ⲡⲧⲏⲣϥ’ <text:line-break/><text:span text:style-name="T1"> </text:span><text:span text:style-name="T2">(46/26) </text:span> ⲡⲱϩ ϣⲁⲣⲟⲉⲓ ⲡⲱϩ ⲛⲛⲟⲩϣⲉ ⲁⲛⲟⲕ’ <text:line-break/><text:span text:style-name="T1"> </text:span><text:span text:style-name="T2">(46/27) </text:span> ϯⲙⲙⲁⲩ ϥⲓ ⲙⲡⲱⲛⲉ ⲉϩⲣⲁⲓ̈ ⲁⲩⲱ ⲧⲉⲧⲛⲁ‐ <text:line-break/><text:span text:style-name="T1"> </text:span><text:span text:style-name="T2">(46/28) </text:span> ϩⲉ ⲉⲣⲟⲉⲓ ⲙⲙⲁⲩ ⲡⲉϫⲉ ⲓ̅ⲥ̅ ϫⲉ ⲉⲧⲃⲉ ⲟⲩ <text:line-break/><text:span text:style-name="T1"> </text:span><text:span text:style-name="T2">(46/29) </text:span> ⲁⲧⲉⲧⲛⲉⲓ ⲉⲃⲟⲗ ⲉⲧⲥⲱϣⲉ ⲉⲛⲁⲩ ⲉⲩⲕⲁϣ <text:line-break/><text:span text:style-name="T1"> </text:span><text:span text:style-name="T2">(46/30) </text:span> ⲉϥⲕⲓⲙ ⲉ̣[ⲃⲟⲗ] ϩⲓⲧⲙ ⲡⲧⲏⲩ ⲁⲩⲱ ⲉⲛⲁⲩ <text:line-break/><text:span text:style-name="T1"> </text:span><text:span text:style-name="T2">(46/31) </text:span> ⲉⲩⲣⲱ̣ⲙ̣[ⲉ ⲉ]ⲩ̣ⲛϣⲧⲏⲛ ⲉⲩϭⲏⲛ ϩⲓⲱⲱⲃ’ <text:line-break/><text:span text:style-name="T1"> </text:span><text:span text:style-name="T2">(46/32) </text:span> ⲛ̣[ⲑⲉ ⲛⲛⲉⲧ]ⲛ̣ⲣⲣⲱⲟⲩ ⲙⲛ ⲛⲉⲧⲙⲙⲉⲅⲓ‐ <text:line-break/><text:span text:style-name="T1"> </text:span><text:span text:style-name="T2">(47/1) </text:span> ⲥⲧⲁⲛⲟⲥ ⲛⲁⲉⲓ ⲉⲛ[ⲉ]ϣ̣ⲧ̣ⲏ̣ⲛ ⲉ̣[ⲧ]‐ <text:line-break/><text:span text:style-name="T1"> </text:span><text:span text:style-name="T2">(47/2) </text:span> ϭⲏⲛ ϩⲓⲱⲟⲩ ⲁⲩⲱ ⲥⲉⲛ̣[ⲁ]ϣⲥⲥⲟⲩⲛ <text:line-break/><text:span text:style-name="T1"> </text:span><text:span text:style-name="T2">(47/3) </text:span> ⲧⲙⲉ ⲁⲛ ⲡⲉϫⲉ ⲟⲩⲥϩⲓⲙ[ⲉ] ⲛⲁϥ ϩⲙ <text:line-break/><text:span text:style-name="T1"> </text:span><text:span text:style-name="T2">(47/4) </text:span> ⲡⲙⲏϣⲉ ϫⲉ ⲛⲉⲉⲓⲁⲧⲥ̣ [ⲛ]ⲑϩⲏ ⲛ‐ <text:line-break/><text:span text:style-name="T1"> </text:span><text:span text:style-name="T2">(47/5) </text:span> ⲧⲁϩϥⲓ ϩⲁⲣⲟⲕ ⲁⲩⲱ ⲛⲕⲓ̣[ⲃ]ⲉ ⲉⲛⲧⲁϩ‐ <text:line-break/><text:span text:style-name="T1"> </text:span><text:span text:style-name="T2">(47/6) </text:span> ⲥⲁ⟦ϩ⟧ⲛⲟⲩϣⲕ ⲡⲉϫⲁϥ ⲛⲁ[ⲥ] ϫⲉ ⲛⲉ‐ <text:line-break/><text:span text:style-name="T1"> </text:span><text:span text:style-name="T2">(47/7) </text:span> ⲉⲓⲁⲧⲟⲩ ⲛⲛⲉⲛⲧⲁϩⲥⲱⲧⲙ ⲁ’‐ <text:line-break/><text:span text:style-name="T1"> </text:span><text:span text:style-name="T2">(47/8) </text:span> ⲡⲗⲟⲅⲟⲥ ⲙⲡⲉⲓⲱⲧ ⲁⲩⲁⲣⲉϩ ⲉⲣⲟϥ <text:line-break/><text:span text:style-name="T1"> </text:span><text:span text:style-name="T2">(47/9) </text:span> ϩⲛ ⲟⲩⲙⲉ ⲟⲩⲛ ϩⲛϩⲟⲟⲩ ⲅⲁⲣ ⲛⲁϣⲱⲡⲉ <text:line-break/><text:span text:style-name="T1"> </text:span><text:span text:style-name="T2">(47/10) </text:span> ⲛⲧⲉⲧⲛϫⲟⲟⲥ ϫⲉ ⲛⲉⲉⲓⲁⲧⲥ ⲛⲑϩⲏ ⲧⲁ‐ <text:line-break/><text:span text:style-name="T1"> </text:span><text:span text:style-name="T2">(47/11) </text:span> ⲉⲓ ⲉⲧⲉ ⲙⲡⲥⲱ ⲁⲩⲱ ⲛⲕⲓⲃⲉ ⲛⲁⲉⲓ ⲉⲙⲡⲟⲩ‐ <text:line-break/><text:span text:style-name="T1"> </text:span><text:span text:style-name="T2">(47/12) </text:span> ϯ ⲉⲣⲱⲧⲉ ⲡⲉϫⲉ ⲓ̅ⲥ̅ ϫⲉ ⲡⲉⲛⲧⲁϩⲥⲟⲩⲱⲛ <text:line-break/><text:span text:style-name="T1"> </text:span><text:span text:style-name="T2">(47/13) </text:span> ⲡⲕⲟⲥⲙⲟⲥ ⲁϥϩⲉ ⲉⲡⲥⲱⲙⲁ ⲡⲉⲛⲧⲁϩϩⲉ <text:line-break/><text:span text:style-name="T1"> </text:span><text:span text:style-name="T2">(47/14) </text:span> ⲇⲉ ⲉⲡⲥⲱⲙⲁ ⲡⲕⲟⲥⲙⲟⲥ ⲙⲡϣⲁ ⲙⲙⲟϥ’ <text:line-break/><text:soft-page-break/><text:span text:style-name="T1"> </text:span><text:span text:style-name="T2">(47/15) </text:span> ⲁⲛ’ ⲡⲉϫⲉ ⲓ̅ⲥ̅ ϫⲉ ⲡⲉⲛⲧⲁϩⲣ ⲣⲙⲙⲁⲟ ⲙⲁ‐ <text:line-break/><text:span text:style-name="T1"> </text:span><text:span text:style-name="T2">(47/16) </text:span> ⲣⲉϥⲣ ⲣⲣⲟ ⲁⲩⲱ ⲡⲉⲧⲉⲩⲛⲧⲁϥ’ ⲛⲟⲩⲇⲩⲛⲁ‐ <text:line-break/><text:span text:style-name="T1"> </text:span><text:span text:style-name="T2">(47/17) </text:span> ⲙⲓⲥ ⲙⲁⲣⲉϥⲁⲣⲛⲁ ⲡⲉϫⲉ ⲓ̅ⲥ̅ ϫⲉ ⲡⲉⲧϩⲏⲛ <text:line-break/><text:span text:style-name="T1"> </text:span><text:span text:style-name="T2">(47/18) </text:span> ⲉⲣⲟⲉⲓ ⲉϥϩⲏⲛ ⲉⲧⲥⲁⲧⲉ ⲁⲩⲱ ⲡⲉⲧⲟⲩⲏⲩ’ <text:line-break/><text:span text:style-name="T1"> </text:span><text:span text:style-name="T2">(47/19) </text:span> ⲙⲙⲟⲉⲓ ϥⲟⲩⲏⲩ ⲛⲧⲙⲛⲧⲉⲣⲟ ⲡⲉϫⲉ ⲓ̅ⲥ̅ <text:line-break/><text:span text:style-name="T1"> </text:span><text:span text:style-name="T2">(47/20) </text:span> ϫⲉ ⲛϩⲓⲕⲱⲛ ⲥⲉⲟⲩⲟⲛϩ ⲉⲃⲟⲗ ⲙⲡⲣⲱ‐ <text:line-break/><text:span text:style-name="T1"> </text:span><text:span text:style-name="T2">(47/21) </text:span> ⲙⲉ ⲁⲩⲱ ⲡⲟⲩⲟⲉⲓⲛ ⲉⲧⲛϩⲏⲧⲟⲩ ϥϩⲏⲡ’ <text:line-break/><text:span text:style-name="T1"> </text:span><text:span text:style-name="T2">(47/22) </text:span> ϩⲛ ⲑⲓⲕⲱⲛ ⲙⲡⲟⲩⲟⲉⲓⲛ ⲙⲡⲉⲓⲱⲧ’ ϥⲛⲁ‐ <text:line-break/><text:span text:style-name="T1"> </text:span><text:span text:style-name="T2">(47/23) </text:span> ϭⲱⲗⲡ’ ⲉⲃⲟⲗ ⲁⲩⲱ ⲧⲉϥϩⲓⲕⲱⲛ ϩⲏⲡ’ <text:line-break/><text:span text:style-name="T1"> </text:span><text:span text:style-name="T2">(47/24) </text:span> ⲉⲃⲟⲗ ϩⲓⲧⲛ ⲡⲉϥ’ⲟⲩⲟⲉⲓⲛ ⲡⲉϫⲉ ⲓ̅ⲥ̅ ⲛϩⲟ‐ <text:line-break/><text:span text:style-name="T1"> </text:span><text:span text:style-name="T2">(47/25) </text:span> ⲟⲩ ⲉⲧⲉⲧⲛⲛⲁⲩ ⲉⲡⲉⲧⲛⲉⲓⲛⲉ ϣⲁⲣⲉⲧⲛ‐ <text:line-break/><text:span text:style-name="T1"> </text:span><text:span text:style-name="T2">(47/26) </text:span> ⲣⲁϣⲉ ϩⲟⲧⲁⲛ ⲇⲉ ⲉⲧⲉⲧⲛϣⲁⲛⲛⲁⲩ’ <text:line-break/><text:span text:style-name="T1"> </text:span><text:span text:style-name="T2">(47/27) </text:span> ⲁⲛⲉⲧⲛϩⲓⲕⲱⲛ’ ⲛⲧⲁϩϣⲱⲡⲉ ϩⲓ ⲧⲉⲧⲛⲉ‐ <text:line-break/><text:span text:style-name="T1"> </text:span><text:span text:style-name="T2">(47/28) </text:span> ϩⲏ ⲟⲩⲧⲉ ⲙⲁⲩⲙⲟⲩ ⲟⲩⲧⲉ ⲙⲁⲩⲟⲩⲱⲛϩ <text:line-break/><text:span text:style-name="T1"> </text:span><text:span text:style-name="T2">(47/29) </text:span> ⲉⲃⲟⲗ ⲧⲉⲧⲛⲁϥⲓ ϩⲁ ⲟⲩⲏⲣ’ ⲡⲉϫⲉ ⲓ̅ⲥ̅ ϫⲉ <text:line-break/><text:span text:style-name="T1"> </text:span><text:span text:style-name="T2">(47/30) </text:span> ⲛⲧⲁ ⲁⲇⲁⲙ ϣⲱⲡⲉ ⲉⲃⲟⲗ ϩⲛⲛⲟⲩⲛⲟϭ <text:line-break/><text:span text:style-name="T1"> </text:span><text:span text:style-name="T2">(47/31) </text:span> ⲛⲇⲩⲛⲁⲙⲓⲥ ⲙⲛ ⲟⲩⲛⲟϭ ⲙⲙⲛⲧⲣⲙⲙⲁ‐ <text:line-break/><text:span text:style-name="T1"> </text:span><text:span text:style-name="T2">(47/32) </text:span> ⲟ ⲁⲩⲱ ⲙⲡⲉϥϣⲱⲡⲉ ⲉ̣[ϥⲙ]ⲡ̣ϣⲁ ⲙⲙⲱ‐ <text:line-break/><text:span text:style-name="T1"> </text:span><text:span text:style-name="T2">(47/33) </text:span> ⲧⲛ ⲛⲉⲩⲁⲝⲓⲟⲥ ⲅⲁⲣ ⲡⲉ [ⲛⲉϥⲛⲁϫⲓ] ϯ̣ⲡ[ⲉ] <text:line-break/><text:span text:style-name="T1"> </text:span><text:span text:style-name="T2">(47/34) </text:span> ⲁⲛ ⲙⲡⲙⲟⲩ ⲡⲉϫⲉ ⲓ̅ⲥ̅ ϫⲉ [ⲛⲃⲁϣⲟⲣ ⲟⲩ]‐ <text:line-break/><text:span text:style-name="T1"> </text:span><text:span text:style-name="T2">(48/1) </text:span> [ⲛⲧ]ⲁ̣ⲩ ⲛⲟ̣ⲩ[ⲃ]ⲏ̣ⲃ̣ ⲁⲩⲱ ⲛ̣ϩⲁⲗⲁⲧⲉ ⲟⲩⲛⲧⲁⲩ <text:line-break/><text:span text:style-name="T1"> </text:span><text:span text:style-name="T2">(48/2) </text:span> ⲙ̣ⲙⲁⲩ ⲙⲡⲉ̣ⲩⲙⲁϩ ⲡϣⲏⲣⲉ ⲇⲉ ⲙⲡⲣⲱⲙⲉ <text:line-break/><text:span text:style-name="T1"> </text:span><text:span text:style-name="T2">(48/3) </text:span> ⲙⲛⲧⲁϥ’ ⲛⲛ[ⲟ]ⲩⲙⲁ ⲉⲣⲓⲕⲉ ⲛⲧⲉϥ’ⲁⲡⲉ ⲛϥ’‐ <text:line-break/><text:span text:style-name="T1"> </text:span><text:span text:style-name="T2">(48/4) </text:span> ⲙⲧⲟⲛ’ ⲙⲙ̣[ⲟ]ϥ̣’ ⲡⲉϫⲁϥ ⲛϭⲓ ⲓ̅ⲥ̅ ϫⲉ ⲟⲩⲧⲁⲗⲁⲓ‐ <text:line-break/><text:span text:style-name="T1"> </text:span><text:span text:style-name="T2">(48/5) </text:span> ⲡⲱⲣⲟⲛ ⲡⲉ̣ ⲡⲥⲱⲙⲁ ⲉⲧⲁϣⲉ ⲛⲟⲩⲥⲱⲙⲁ’ <text:line-break/><text:span text:style-name="T1"> </text:span><text:span text:style-name="T2">(48/6) </text:span> ⲁⲩⲱ ⲟⲩⲧⲁ̣ⲗⲁⲓⲡⲱⲣⲟⲥ ⲧⲉ ⲧ’ⲯⲩⲭⲏ ⲉⲧⲁϣⲉ <text:line-break/><text:span text:style-name="T1"> </text:span><text:span text:style-name="T2">(48/7) </text:span> ⲛⲛⲁⲉⲓ ⲙ̣ⲡ̣ⲥⲛⲁⲩ ⲡⲉϫⲉ ⲓ̅ⲥ̅ ϫⲉ ⲛⲁⲅⲅⲉⲗⲟⲥ <text:line-break/><text:span text:style-name="T1"> </text:span><text:span text:style-name="T2">(48/8) </text:span> ⲛⲏⲩ ϣⲁⲣ̣ⲱⲧⲛ ⲙⲛ ⲛⲡⲣⲟⲫⲏⲧⲏⲥ ⲁⲩⲱ ⲥⲉ‐ <text:line-break/><text:span text:style-name="T1"> </text:span><text:span text:style-name="T2">(48/9) </text:span> ⲛⲁϯ ⲛⲏⲧⲛ ⲛⲛⲉⲧⲉⲩⲛⲧⲏⲧⲛⲥⲉ ⲁⲩⲱ’ <text:line-break/><text:span text:style-name="T1"> </text:span><text:span text:style-name="T2">(48/10) </text:span> ⲛⲧⲱⲧⲛ ϩⲱⲧ’ⲧⲏⲩⲧⲛ ⲛⲉⲧⲛⲧⲟⲧ’ⲧⲏⲛⲉ <text:line-break/><text:span text:style-name="T1"> </text:span><text:span text:style-name="T2">(48/11) </text:span> ⲧⲁⲁⲩ ⲛⲁⲩ ⲛⲧⲉⲧⲛϫⲟⲟⲥ ⲛⲏⲧⲛ ϫⲉ ⲁϣ ⲛ‐ <text:line-break/><text:span text:style-name="T1"> </text:span><text:span text:style-name="T2">(48/12) </text:span> ϩⲟⲟⲩ ⲡⲉⲧⲟⲩⲛⲛⲏⲩ ⲛⲥⲉϫⲓ ⲡⲉⲧⲉ ⲡⲱⲟⲩ <text:line-break/><text:span text:style-name="T1"> </text:span><text:span text:style-name="T2">(48/13) </text:span> ⲡⲉϫⲉ ⲓ̅ⲥ̅ ϫⲉ ⲉⲧⲃⲉ ⲟⲩ ⲧⲉⲧⲛⲉⲓⲱⲉ ⲙⲡⲥⲁ ⲛ‐ <text:line-break/><text:span text:style-name="T1"> </text:span><text:span text:style-name="T2">(48/14) </text:span> ⲃⲟⲗ’ ⲙⲡⲡⲟⲧⲏⲣⲓⲟⲛ ⲧⲉⲧⲛⲣⲛⲟⲉⲓ ⲁⲛ ϫⲉ <text:line-break/><text:span text:style-name="T1"> </text:span><text:span text:style-name="T2">(48/15) </text:span> ⲡⲉⲛⲧⲁϩⲧⲁⲙⲓⲟ ⲙⲡⲥⲁ ⲛϩⲟⲩⲛ ⲛⲧⲟϥ ⲟⲛ’ <text:line-break/><text:span text:style-name="T1"> </text:span><text:span text:style-name="T2">(48/16) </text:span> ⲡⲉⲛⲧⲁϥⲧⲁⲙⲓⲟ ⲙⲡⲥⲁ ⲛⲃⲟⲗ’ ⲡⲉϫⲉ ⲓⲏ̅ⲥ̅ <text:line-break/><text:span text:style-name="T1"> </text:span><text:span text:style-name="T2">(48/17) </text:span> ϫⲉ ⲁⲙⲏⲉⲓⲧⲛ ϣⲁⲣⲟⲉⲓ’ ϫⲉ ⲟⲩⲭⲣⲏⲥⲧⲟⲥ <text:line-break/><text:span text:style-name="T1"> </text:span><text:span text:style-name="T2">(48/18) </text:span> ⲡⲉ ⲡⲁⲛⲁϩⲃ’ ⲁⲩⲱ ⲧⲁⲙⲛ̅ⲧ̅ϫⲟⲉⲓⲥ ⲟⲩⲣⲙ‐ <text:line-break/><text:span text:style-name="T1"> </text:span><text:span text:style-name="T2">(48/19) </text:span> ⲣⲁϣ ⲧⲉ ⲁⲩⲱ ⲧⲉⲧⲛⲁϩⲉ † ⲁⲩⲁⲛⲁⲩⲡⲁⲥⲓⲥ ⲛⲏ‐ <text:line-break/><text:span text:style-name="T1"> </text:span><text:span text:style-name="T2">(48/20) </text:span> ⲧⲛ ⲡⲉϫⲁⲩ ⲛⲁϥ’ ϫⲉ ϫⲟⲟⲥ ⲉⲣⲟⲛ ϫⲉ <text:line-break/><text:span text:style-name="T1"> </text:span><text:span text:style-name="T2">(48/21) </text:span> ⲛⲧⲕ ⲛⲓⲙ’ ϣⲓⲛⲁ ⲉⲛⲁⲣⲡⲓⲥⲧⲉⲩⲉ ⲉⲣⲟⲕ’ ⲡⲉ‐ <text:line-break/><text:span text:style-name="T1"> </text:span><text:span text:style-name="T2">(48/22) </text:span> ϫⲁϥ ⲛⲁⲩ ϫⲉ ⲧⲉⲧⲛⲣⲡⲓⲣⲁⲍⲉ ⲙⲡϩⲟ ⲛⲧⲡⲉ <text:line-break/><text:span text:style-name="T1"> </text:span><text:span text:style-name="T2">(48/23) </text:span> ⲙⲛ ⲡⲕⲁϩ ⲁⲩⲱ ⲡⲉⲧⲛⲡⲉⲧⲛⲙⲧⲟ ⲉⲃⲟⲗ’ <text:line-break/><text:span text:style-name="T1"> </text:span><text:span text:style-name="T2">(48/24) </text:span> ⲙⲡⲉⲧⲛⲥⲟⲩⲱⲛϥ’ ⲁⲩⲱ ⲡⲉⲉⲓⲕⲁⲓⲣⲟⲥ ⲧⲉ‐ <text:line-break/><text:span text:style-name="T1"> </text:span><text:span text:style-name="T2">(48/25) </text:span> ⲧⲛⲥⲟⲟⲩⲛ ⲁⲛ ⲛⲣⲡⲓⲣⲁⲍⲉ ⲙⲙⲟϥ’ ⲡⲉϫⲉ <text:line-break/><text:span text:style-name="T1"> </text:span><text:span text:style-name="T2">(48/26) </text:span> ⲓ̅ⲥ̅ ϫⲉ ϣⲓⲛⲉ ⲁⲩⲱ ⲧⲉⲧⲛⲁϭⲓⲛⲉ ⲁⲗⲗⲁ ⲛⲉ‐ <text:line-break/><text:span text:style-name="T1"> </text:span><text:span text:style-name="T2">(48/27) </text:span> ⲧⲁⲧⲉⲧⲛϫⲛⲟⲩⲉⲓ ⲉⲣⲟⲟⲩ ⲛⲛⲓϩⲟⲟⲩ ⲉⲙⲡⲓ‐ <text:line-break/><text:soft-page-break/><text:span text:style-name="T1"> </text:span><text:span text:style-name="T2">(48/28) </text:span> ϫⲟⲟⲩ ⲛⲏⲧⲛ ⲙⲫⲟⲟⲩ ⲉⲧⲙⲙⲁⲩ ⲧⲉⲛⲟⲩ <text:line-break/><text:span text:style-name="T1"> </text:span><text:span text:style-name="T2">(48/29) </text:span> ⲉϩⲛⲁⲓ̈ ⲉϫⲟⲟⲩ ⲁⲩⲱ ⲧⲉⲧⲛϣⲓⲛⲉ ⲁⲛ’ ⲛⲥⲱ‐ <text:line-break/><text:span text:style-name="T1"> </text:span><text:span text:style-name="T2">(48/30) </text:span> ⲟⲩ 〈ⲡⲉϫⲉ ⲓ̅ⲥ̅ ϫⲉ〉 ⲙⲡⲣϯ ⲡⲉⲧⲟⲩⲁⲁⲃ ⲛⲛⲟⲩϩⲟⲟⲣ’ ϫⲉⲕⲁⲥ <text:line-break/><text:span text:style-name="T1"> </text:span><text:span text:style-name="T2">(48/31) </text:span> ⲛⲟⲩⲛⲟϫⲟⲩ ⲉⲧⲕⲟⲡⲣⲓⲁ ⲙⲡⲣⲛⲟⲩϫⲉ ⲛⲙ‐ <text:line-break/><text:span text:style-name="T1"> </text:span><text:span text:style-name="T2">(48/32) </text:span> ⲙⲁⲣⲅⲁⲣⲓⲧⲏ̣[ⲥ ⲛ]ⲛⲉϣⲁⲩ ϣⲓⲛⲁ ϫⲉ ⲛⲟⲩⲁⲁϥ’ <text:line-break/><text:span text:style-name="T1"> </text:span><text:span text:style-name="T2">(48/33) </text:span> ⲛ̣ⲗ̣ⲁ[...] [ⲡⲉϫ]ⲉ̣ ⲓⲥ ⲡⲉⲧϣⲓⲛⲉ ϥⲛⲁϭⲓⲛⲉ <text:line-break/><text:span text:style-name="T1"> </text:span><text:span text:style-name="T2">(48/34) </text:span> [ⲡⲉⲧⲧⲱϩⲙ ⲉ]ϩ̣ⲟⲩⲛ ⲥⲉⲛⲁⲟⲩⲱⲛ ⲛⲁϥ’ <text:line-break/><text:span text:style-name="T1"> </text:span><text:span text:style-name="T2">(48/35) </text:span> [ⲡⲉϫⲉ ⲓ̅ⲥ̅ ϫⲉ] ⲉϣⲱⲡⲉ ⲟⲩⲛⲧⲏⲧⲛ ϩⲟⲙⲧ’ <text:line-break/><text:span text:style-name="T1"> </text:span><text:span text:style-name="T2">(49/1) </text:span> ⲙⲡⲣϯ ⲉⲧⲙⲏⲥⲉ ⲁⲗⲗⲁ ϯ [ⲙⲙⲟϥ] ⲙ̣ⲡⲉⲧ̣[ⲉ]‐ <text:line-break/><text:span text:style-name="T1"> </text:span><text:span text:style-name="T2">(49/2) </text:span> ⲧⲛⲁϫⲓⲧⲟⲩ ⲁⲛ ⲛⲧⲟⲟⲧϥ’ ⲡ̣[ⲉϫ]ⲉ ⲓ̅ⲥ̅ ϫⲉ ⲧ̅ⲙⲛ̅‐ <text:line-break/><text:span text:style-name="T1"> </text:span><text:span text:style-name="T2">(49/3) </text:span> ⲧⲉⲣⲟ ⲙⲡⲉⲓⲱⲧ’ ⲉⲥⲧⲛⲧⲱ[ⲛ ⲁⲩ]ⲥϩⲓⲙⲉ <text:line-break/><text:span text:style-name="T1"> </text:span><text:span text:style-name="T2">(49/4) </text:span> ⲁⲥϫⲓ ⲛⲟⲩⲕⲟⲩⲉⲓ ⲛⲥⲁⲉⲓⲣ ⲁ̣[ⲥϩ]ⲟ̣ⲡϥ’ ϩⲛ <text:line-break/><text:span text:style-name="T1"> </text:span><text:span text:style-name="T2">(49/5) </text:span> ⲟⲩϣⲱⲧⲉ ⲁⲥⲁⲁϥ ⲛϩⲛⲛⲟ[ϭ ⲛ]ⲛⲟⲉⲓⲕ’ <text:line-break/><text:span text:style-name="T1"> </text:span><text:span text:style-name="T2">(49/6) </text:span> ⲡⲉⲧⲉⲩⲙ ⲙⲁⲁϫⲉ ⲙⲙⲟϥ ⲙⲁ[ⲣⲉ]ϥ̣ⲥ̣ⲱⲧⲙ’ <text:line-break/><text:span text:style-name="T1"> </text:span><text:span text:style-name="T2">(49/7) </text:span> ⲡⲉϫⲉ ⲓ̅ⲥ̅ ϫⲉ ⲧⲙⲛⲧⲉⲣⲟ ⲙⲡⲉ̣[ⲓⲱⲧ ⲉ]ⲥⲧⲛ‐ <text:line-break/><text:span text:style-name="T1"> </text:span><text:span text:style-name="T2">(49/8) </text:span> ⲧⲱⲛ ⲁⲩⲥϩⲓⲙⲉ ⲉⲥϥⲓ ϩⲁ ⲟⲩϭⲗ[ⲙⲉⲉⲓ] ⲉϥ’‐ <text:line-break/><text:span text:style-name="T1"> </text:span><text:span text:style-name="T2">(49/9) </text:span> ⲙⲉϩ ⲛⲛⲟⲉⲓⲧ’ ⲉⲥⲙⲟⲟϣⲉ ϩ[ⲓ ⲧⲉ]ϩⲓⲏ’ <text:line-break/><text:span text:style-name="T1"> </text:span><text:span text:style-name="T2">(49/10) </text:span> ⲉⲥⲟⲩⲏⲟⲩ ⲁⲡⲙⲁⲁϫⲉ ⲙⲡϭⲗⲙ[ⲉ]ⲉ̣ⲓ ⲟⲩ‐ <text:line-break/><text:span text:style-name="T1"> </text:span><text:span text:style-name="T2">(49/11) </text:span> ⲱϭⲡ’ ⲁⲡⲛⲟⲉⲓⲧ’ ϣⲟⲩⲟ ⲛⲥⲱⲥ̣ [ϩ]ⲓ̣ ⲧⲉϩⲓ‐ <text:line-break/><text:span text:style-name="T1"> </text:span><text:span text:style-name="T2">(49/12) </text:span> ⲏ ⲛⲉⲥⲥⲟⲟⲩⲛ ⲁⲛ ⲡⲉ ⲛⲉ ⲙⲡⲉⲥⲉⲓⲙⲉ <text:line-break/><text:span text:style-name="T1"> </text:span><text:span text:style-name="T2">(49/13) </text:span> ⲉϩⲓⲥⲉ ⲛⲧⲁⲣⲉⲥⲡⲱϩ ⲉϩⲟⲩⲛ ⲉⲡⲉⲥⲏⲉⲓ <text:line-break/><text:span text:style-name="T1"> </text:span><text:span text:style-name="T2">(49/14) </text:span> ⲁⲥⲕⲁ ⲡϭⲗⲙⲉⲉⲓ ⲁⲡⲉⲥⲏⲧ’ ⲁⲥϩⲉ ⲉⲣⲟϥ ⲉϥ’‐ <text:line-break/><text:span text:style-name="T1"> </text:span><text:span text:style-name="T2">(49/15) </text:span> ϣⲟⲩⲉⲓⲧ’ ⲡⲉϫⲉ ⲓ̅ⲥ̅ ⲧⲙⲛⲧⲉⲣⲟ ⲙⲡⲉⲓⲱⲧ’ <text:line-break/><text:span text:style-name="T1"> </text:span><text:span text:style-name="T2">(49/16) </text:span> ⲉⲥⲧⲛⲧⲱⲛ ⲉⲩⲣⲱⲙⲉ ⲉϥⲟⲩⲱϣ ⲉⲙⲟⲩⲧ <text:line-break/><text:span text:style-name="T1"> </text:span><text:span text:style-name="T2">(49/17) </text:span> ⲟⲩⲣⲱⲙⲉ ⲙⲙⲉⲅⲓⲥⲧⲁⲛⲟⲥ ⲁϥϣⲱⲗⲙ’ ⲛ‐ <text:line-break/><text:span text:style-name="T1"> </text:span><text:span text:style-name="T2">(49/18) </text:span> ⲧⲥⲏϥⲉ ϩⲙ ⲡⲉϥⲏⲉⲓ ⲁϥϫⲟⲧⲥ ⲛⲧϫⲟ ϫⲉ‐ <text:line-break/><text:span text:style-name="T1"> </text:span><text:span text:style-name="T2">(49/19) </text:span> ⲕⲁⲁⲥ ⲉϥⲛⲁⲉⲓⲙⲉ ϫⲉ ⲧⲉϥϭⲓϫ’ ⲛⲁⲧⲱⲕ’ <text:line-break/><text:span text:style-name="T1"> </text:span><text:span text:style-name="T2">(49/20) </text:span> ⲉϩⲟⲩⲛ ⲧⲟⲧⲉ ⲁϥϩⲱⲧⲃ ⲙⲡⲙⲉⲅⲓⲥⲧⲁⲛⲟⲥ <text:line-break/><text:span text:style-name="T1"> </text:span><text:span text:style-name="T2">(49/21) </text:span> ⲡⲉϫⲉ ⲙⲙⲁⲑⲏⲧⲏⲥ ⲛⲁϥ ϫⲉ ⲛⲉⲕ’ⲥⲛⲏⲩ <text:line-break/><text:span text:style-name="T1"> </text:span><text:span text:style-name="T2">(49/22) </text:span> ⲙⲛ ⲧⲉⲕⲙⲁⲁⲩ ⲥⲉⲁϩⲉⲣⲁⲧⲟⲩ ϩⲓ ⲡⲥⲁ ⲛ‐ <text:line-break/><text:span text:style-name="T1"> </text:span><text:span text:style-name="T2">(49/23) </text:span> ⲃⲟⲗ ⲡⲉϫⲁϥ ⲛⲁⲩ ϫⲉ ⲛⲉⲧⲛⲛⲉⲉⲓⲙⲁ <text:line-break/><text:span text:style-name="T1"> </text:span><text:span text:style-name="T2">(49/24) </text:span> ⲉϯⲣⲉ ⲙⲡⲟⲩⲱϣ ⲙⲡⲁⲉⲓⲱⲧ’ ⲛⲁⲉⲓ ⲛⲉ <text:line-break/><text:span text:style-name="T1"> </text:span><text:span text:style-name="T2">(49/25) </text:span> ⲛⲁⲥⲛⲏⲩ ⲙⲛ ⲧⲁⲙⲁⲁⲩ ⲛⲧⲟⲟⲩ ⲡⲉ ⲉⲧⲛⲁ‐ <text:line-break/><text:span text:style-name="T1"> </text:span><text:span text:style-name="T2">(49/26) </text:span> ⲃⲱⲕ’ ⲉϩⲟⲩⲛ ⲉⲧⲙⲛⲧⲉⲣⲟ ⲙⲡⲁⲉⲓⲱⲧ’ <text:line-break/><text:span text:style-name="T1"> </text:span><text:span text:style-name="T2">(49/27) </text:span> ⲁⲩⲧⲥⲉⲃⲉ ⲓ̅ⲥ̅ ⲁⲩⲛⲟⲩⲃ ⲁⲩⲱ ⲡⲉϫⲁⲩ ⲛⲁϥ’ <text:line-break/><text:span text:style-name="T1"> </text:span><text:span text:style-name="T2">(49/28) </text:span> ϫⲉ ⲛⲉⲧⲏⲡ’ ⲁⲕⲁⲓⲥⲁⲣ’ ⲥⲉϣⲓⲧⲉ ⲙⲙⲟⲛ ⲛ‐ <text:line-break/><text:span text:style-name="T1"> </text:span><text:span text:style-name="T2">(49/29) </text:span> ⲛϣⲱⲙ’ ⲡⲉϫⲁϥ ⲛⲁⲩ ϫⲉ ϯ ⲛⲁ ⲕⲁⲓⲥⲁⲣ’ <text:line-break/><text:span text:style-name="T1"> </text:span><text:span text:style-name="T2">(49/30) </text:span> ⲛⲕⲁⲓⲥⲁⲣ ϯ ⲛⲁ ⲡⲛⲟⲩⲧⲉ ⲙⲡⲛⲟⲩⲧⲉ <text:line-break/><text:span text:style-name="T1"> </text:span><text:span text:style-name="T2">(49/31) </text:span> ⲁⲩⲱ ⲡⲉⲧⲉ ⲡⲱⲉⲓ ⲡⲉ ⲙⲁⲧⲛⲛⲁⲉⲓϥ <text:line-break/><text:span text:style-name="T1"> </text:span><text:span text:style-name="T2">(49/32) </text:span> 〈ⲡⲉϫⲉ ⲓ̅ⲥ̅〉 ⲡⲉⲧⲁⲙⲉⲥⲧⲉ ⲡⲉϥⲉⲓ̣[ⲱⲧ]’ ⲁ̣ⲛ ⲙⲛ ⲧⲉϥ’‐ <text:line-break/><text:span text:style-name="T1"> </text:span><text:span text:style-name="T2">(49/33) </text:span> ⲙⲁⲁⲩ ⲛⲧⲁϩⲉ ϥⲛⲁϣⲣ ⲙ[ⲁⲑⲏⲧ]ⲏ̣ⲥ ⲛⲁ̣ⲉⲓ ⲁⲛ <text:line-break/><text:span text:style-name="T1"> </text:span><text:span text:style-name="T2">(49/34) </text:span> ⲁⲩⲱ ⲡⲉⲧⲁⲙⲣⲣⲉ ⲡⲉϥ̣[ⲉⲓⲱⲧ ⲁⲛ ⲙ]ⲛ̣ ⲧⲉϥ‐ <text:line-break/><text:span text:style-name="T1"> </text:span><text:span text:style-name="T2">(49/35) </text:span> ⲙⲁⲁⲩ ⲛⲧⲁϩⲉ ϥⲛⲁϣⲣ ⲙ[ⲁⲑⲏⲧⲏⲥ ⲛⲁ]‐ <text:line-break/><text:span text:style-name="T1"> </text:span><text:span text:style-name="T2">(49/36) </text:span> ⲉⲓ ⲁⲛ ⲧⲁⲙⲁⲁⲩ ⲅⲁⲣ ⲛⲧⲁⲥ̣ [.........] <text:line-break/><text:span text:style-name="T1"> </text:span><text:span text:style-name="T2">(50/1) </text:span> [..]ⲟⲗ ⲧ̣ⲁ[ⲙⲁⲁ]ⲩ̣ ⲇⲉ ⲙⲙⲉ ⲁⲥϯ ⲛⲁⲉⲓ ⲙⲡⲱⲛϩ <text:line-break/><text:span text:style-name="T1"> </text:span><text:span text:style-name="T2">(50/2) </text:span> ⲡⲉϫⲉ ⲓ̅ⲥ̅ [ϫⲉ ⲟ]ⲩⲟⲉⲓ ⲛⲁⲩ ⲙⲫⲁⲣⲓⲥⲁⲓⲟⲥ ϫⲉ <text:line-break/><text:span text:style-name="T1"> </text:span><text:span text:style-name="T2">(50/3) </text:span> ⲉⲩⲉⲓⲛⲉ̣ [ⲛⲛ]ⲟⲩⲟⲩϩⲟⲣ ⲉϥ’ⲛⲕⲟⲧⲕ’ ϩⲓϫⲛ ⲡⲟⲩ‐ <text:line-break/><text:soft-page-break/><text:span text:style-name="T1"> </text:span><text:span text:style-name="T2">(50/4) </text:span> ⲟⲛⲉϥ’ ⲛϩ̣[ⲛ]ⲛ̣ⲉϩⲟⲟⲩ ϫⲉ ⲟⲩⲧⲉ ϥⲟⲩⲱⲙ ⲁⲛ <text:line-break/><text:span text:style-name="T1"> </text:span><text:span text:style-name="T2">(50/5) </text:span> ⲟⲩⲧⲉ ϥⲕ̣[ⲱ] ⲁ̣ⲛ ⲛⲛⲉϩⲟⲟⲩ ⲉⲟⲩⲱⲙ ⲡⲉϫⲉ ⲓ̅ⲥ̅ <text:line-break/><text:span text:style-name="T1"> </text:span><text:span text:style-name="T2">(50/6) </text:span> ϫⲉ ⲟⲩⲙⲁ̣[ⲕⲁ]ⲣⲓⲟⲥ ⲡⲉ ⲡⲣⲱⲙⲉ ⲡⲁⲉⲓ ⲉⲧⲥⲟⲟⲩⲛ <text:line-break/><text:span text:style-name="T1"> </text:span><text:span text:style-name="T2">(50/7) </text:span> ϫⲉ ϩ[ⲛ ⲁϣ] ⲙⲙⲉⲣⲟⲥ ⲉⲛⲗⲏⲥⲧⲏⲥ ⲛⲏϥ ⲉϩⲟⲩⲛ <text:line-break/><text:span text:style-name="T1"> </text:span><text:span text:style-name="T2">(50/8) </text:span> ϣⲓⲛⲁ̣ [ⲉϥ]ⲛ̣ⲁⲧⲱⲟⲩⲛ’ ⲛϥⲥⲱ⟦ϩ⟧ⲟⲩϩ ⲛⲧⲉϥ’‐ <text:line-break/><text:span text:style-name="T1"> </text:span><text:span text:style-name="T2">(50/9) </text:span> ⲙⲛ̅ⲧ̅ⲉ̣[ⲣⲟ] ⲛϥⲙⲟⲩⲣ ⲙⲙⲟϥ ⲉϫⲛ ⲧⲉϥ’‐ <text:line-break/><text:span text:style-name="T1"> </text:span><text:span text:style-name="T2">(50/10) </text:span> ϯⲡⲉ ϩ̣[ⲁ] ⲧⲉϩⲏ ⲉⲙ’ⲡⲁⲧⲟⲩⲉⲓ ⲉϩⲟⲩⲛ ⲡⲉ‐ <text:line-break/><text:span text:style-name="T1"> </text:span><text:span text:style-name="T2">(50/11) </text:span> ϫⲁⲩ ⲛ̣[ⲓ̅]̅ⲥ̣̅̅ ϫⲉ ⲁⲙⲟⲩ ⲛⲧⲛϣⲗⲏⲗ’ ⲙⲡⲟⲟⲩ <text:line-break/><text:span text:style-name="T1"> </text:span><text:span text:style-name="T2">(50/12) </text:span> ⲁⲩⲱ ⲛⲧⲛⲣⲛⲏⲥⲧⲉⲩⲉ ⲡⲉϫⲉ ⲓ̅ⲥ̅ ϫⲉ ⲟⲩ ⲅⲁⲣ’ <text:line-break/><text:span text:style-name="T1"> </text:span><text:span text:style-name="T2">(50/13) </text:span> ⲡⲉ ⲡⲛⲟⲃⲉ ⲛⲧⲁⲉⲓⲁⲁϥ’ ⲏ ⲛⲧⲁⲩϫⲣⲟ ⲉⲣⲟⲉⲓ <text:line-break/><text:span text:style-name="T1"> </text:span><text:span text:style-name="T2">(50/14) </text:span> ϩⲛ ⲟⲩ ⲁⲗⲗⲁ ϩⲟⲧⲁⲛ ⲉⲣϣⲁⲛ ⲡⲛⲩⲙⲫⲓⲟⲥ ⲉⲓ <text:line-break/><text:span text:style-name="T1"> </text:span><text:span text:style-name="T2">(50/15) </text:span> ⲉⲃⲟⲗ ϩⲙ ⲡⲛⲩⲙⲫⲱⲛ ⲧⲟⲧⲉ ⲙⲁⲣⲟⲩⲛⲏ’‐ <text:line-break/><text:span text:style-name="T1"> </text:span><text:span text:style-name="T2">(50/16) </text:span> ⲥⲧⲉⲩⲉ ⲁⲩⲱ ⲙⲁⲣⲟⲩϣⲗⲏⲗ’ ⲡⲉϫⲉ ⲓ̅ⲥ̅ ϫⲉ ⲡⲉ‐ <text:line-break/><text:span text:style-name="T1"> </text:span><text:span text:style-name="T2">(50/17) </text:span> ⲧⲛⲁⲥⲟⲩⲱⲛ ⲡⲉⲓⲱⲧ’ ⲙⲛ ⲧⲙⲁⲁⲩ ⲥⲉⲛⲁⲙⲟⲩ‐ <text:line-break/><text:span text:style-name="T1"> </text:span><text:span text:style-name="T2">(50/18) </text:span> ⲧⲉ ⲉⲣⲟϥ’ ϫⲉ ⲡϣⲏⲣⲉ ⲙⲡⲟⲣⲛⲏ ⲡⲉϫⲉ ⲓ̅ⲥ̅ ϫⲉ <text:line-break/><text:span text:style-name="T1"> </text:span><text:span text:style-name="T2">(50/19) </text:span> ϩⲟⲧⲁⲛ ⲉⲧⲉⲧⲛϣⲁⲣ ⲡⲥⲛⲁⲩ ⲟⲩⲁ ⲧⲉⲧⲛⲁϣⲱ‐ <text:line-break/><text:span text:style-name="T1"> </text:span><text:span text:style-name="T2">(50/20) </text:span> ⲡⲉ ⲛϣⲏⲣⲉ ⲙⲡⲣⲱⲙⲉ ⲁⲩⲱ ⲉⲧⲉⲧⲛϣⲁⲛ’‐ <text:line-break/><text:span text:style-name="T1"> </text:span><text:span text:style-name="T2">(50/21) </text:span> ϫⲟⲟⲥ ϫⲉ ⲡⲧⲟⲟⲩ ⲡⲱⲱⲛⲉ ⲉⲃⲟⲗ’ ϥⲛⲁ‐ <text:line-break/><text:span text:style-name="T1"> </text:span><text:span text:style-name="T2">(50/22) </text:span> ⲡⲱⲱⲛⲉ ⲡⲉϫⲉ ⲓ̅ⲥ̅ ϫⲉ ⲧⲙⲛⲧⲉⲣⲟ ⲉⲥⲧⲛⲧⲱⲛ <text:line-break/><text:span text:style-name="T1"> </text:span><text:span text:style-name="T2">(50/23) </text:span> ⲉⲩⲣⲱⲙⲉ ⲛϣⲱⲥ ⲉⲩⲛⲧⲁϥ’ ⲙⲙⲁⲩ ⲛϣⲉ ⲛ‐ <text:line-break/><text:span text:style-name="T1"> </text:span><text:span text:style-name="T2">(50/24) </text:span> ⲉⲥⲟⲟⲩ ⲁⲟⲩⲁ ⲛϩⲏⲧⲟⲩ ⲥⲱⲣⲙ’ ⲉⲡⲛⲟϭ ⲡⲉ <text:line-break/><text:span text:style-name="T1"> </text:span><text:span text:style-name="T2">(50/25) </text:span> ⲁϥⲕⲱ ⲙⲡⲥⲧⲉⲯⲓⲧ ⲁϥϣⲓⲛⲉ ⲛⲥⲁ ⲡⲓⲟⲩⲁ’ <text:line-break/><text:span text:style-name="T1"> </text:span><text:span text:style-name="T2">(50/26) </text:span> ϣⲁⲛⲧⲉϥϩⲉ ⲉⲣⲟϥ ⲛⲧⲁⲣⲉϥϩⲓⲥⲉ ⲡⲉϫⲁϥ’ <text:line-break/><text:span text:style-name="T1"> </text:span><text:span text:style-name="T2">(50/27) </text:span> ⲙⲡⲉⲥⲟ⟦ⲩ⟧ⲟⲩ ϫⲉ ϯⲟⲩⲟϣⲕ’ ⲡⲁⲣⲁ ⲡⲥⲧⲉⲯⲓⲧ’ <text:line-break/><text:span text:style-name="T1"> </text:span><text:span text:style-name="T2">(50/28) </text:span> ⲡⲉϫⲉ ⲓ̅ⲥ̅ ϫⲉ ⲡⲉⲧⲁⲥⲱ ⲉⲃⲟⲗ ϩⲛ ⲧⲁⲧⲁⲡⲣⲟ <text:line-break/><text:span text:style-name="T1"> </text:span><text:span text:style-name="T2">(50/29) </text:span> ϥⲛⲁϣⲱⲡⲉ ⲛⲧⲁϩⲉ ⲁⲛⲟⲕ ϩⲱ ϯⲛⲁϣⲱⲡⲉ <text:line-break/><text:span text:style-name="T1"> </text:span><text:span text:style-name="T2">(50/30) </text:span> ⲉⲛⲧⲟϥ ⲡⲉ ⲁⲩⲱ ⲛⲉⲑⲏⲡ’ ⲛⲁ’ⲟⲩⲱⲛϩ ⲉⲣⲟϥ’ <text:line-break/><text:span text:style-name="T1"> </text:span><text:span text:style-name="T2">(50/31) </text:span> ⲡⲉϫⲉ ⲓ̅ⲥ̅ ϫⲉ ⲧⲙⲛⲧⲉⲣⲟ ⲉⲥⲧⲛⲧⲱⲛ ⲉⲩⲣⲱ‐ <text:line-break/><text:span text:style-name="T1"> </text:span><text:span text:style-name="T2">(50/32) </text:span> ⲙⲉ ⲉⲩⲛⲧⲁϥ ⲙ̣ⲙ̣ⲁⲩ ϩⲛ ⲧⲉϥ’ⲥⲱϣⲉ ⲛⲛⲟⲩ‐ <text:line-break/><text:span text:style-name="T1"> </text:span><text:span text:style-name="T2">(50/33) </text:span> ⲉϩⲟ ⲉϥϩⲏ̣[ⲡ ⲉ]ϥ̣ⲟ ⲛⲁⲧⲥⲟⲟⲩⲛ’ ⲉⲣⲟϥ ⲁⲩ‐ <text:line-break/><text:span text:style-name="T1"> </text:span><text:span text:style-name="T2">(50/34) </text:span> ⲱ ⲙ[ⲙⲛⲛⲥⲁ ⲧ]ⲣⲉϥⲙⲟⲩ ⲁϥⲕⲁⲁϥ ⲙ̅ⲡ̅ⲉϥ’‐ <text:line-break/><text:span text:style-name="T1"> </text:span><text:span text:style-name="T2">(50/35) </text:span> [ϣⲏⲣⲉ ⲛⲉ] ⲡ̣ϣⲏⲣⲉ ⲥⲟⲟⲩⲛ ⲁⲛ’ ⲁϥϥⲓ’ <text:line-break/><text:span text:style-name="T1"> </text:span><text:span text:style-name="T2">(51/1) </text:span> ⲧⲥⲱϣⲉ ⲉⲧⲙⲙⲁⲩ ⲁϥⲧⲁⲁⲥ̣ [ⲉⲃⲟ]ⲗ ⲁⲩⲱ ⲡⲉ̣[ⲛ]‐ <text:line-break/><text:span text:style-name="T1"> </text:span><text:span text:style-name="T2">(51/2) </text:span> ⲧⲁϩⲧⲟⲟⲩⲥ ⲁϥⲉⲓ ⲉϥⲥⲕⲁⲉⲓ ⲁ[ϥϩ]ⲉ̣ ⲁⲡⲉϩⲟ ⲁϥ‐ <text:line-break/><text:span text:style-name="T1"> </text:span><text:span text:style-name="T2">(51/3) </text:span> ⲁⲣⲭⲉⲓ ⲛϯ ϩⲟⲙⲧ’ ⲉⲧⲙⲏⲥⲉ ⲛ̣[ⲛⲉ]ⲧ̣ϥⲟⲩⲟϣⲟⲩ <text:line-break/><text:span text:style-name="T1"> </text:span><text:span text:style-name="T2">(51/4) </text:span> ⲡⲉϫⲉ ⲓ̅ⲥ̅ ϫⲉ † ⲡⲉⲛⲧⲁϩϭⲓⲛⲉ̣ ⲙ̣ⲡⲕⲟⲥⲙⲟⲥ <text:line-break/><text:span text:style-name="T1"> </text:span><text:span text:style-name="T2">(51/5) </text:span> ⲛϥⲣ ⲣⲙⲙⲁⲟ † ⲙⲁⲣⲉϥⲁⲣⲛⲁ ⲙⲡⲕⲟⲥⲙⲟⲥ <text:line-break/><text:span text:style-name="T1"> </text:span><text:span text:style-name="T2">(51/6) </text:span> ⲡⲉϫⲉ ⲓ̅ⲥ̅ ϫⲉ ⲙⲡⲏⲩⲉ ⲛⲁϭⲱⲗ’ ⲁⲩⲱ ⲡⲕⲁϩ <text:line-break/><text:span text:style-name="T1"> </text:span><text:span text:style-name="T2">(51/7) </text:span> ⲙⲡⲉⲧⲛⲙⲧⲟ ⲉⲃⲟⲗ’ ⲁⲩⲱ ⲡⲉⲧⲟⲛϩ ⲉⲃⲟⲗ ϩⲛ <text:line-break/><text:span text:style-name="T1"> </text:span><text:span text:style-name="T2">(51/8) </text:span> ⲡⲉⲧⲟⲛϩ ϥⲛⲁⲛⲁⲩ ⲁⲛ ⲉⲙⲟⲩ ⲟⲩⲭ ϩⲟⲧⲓ ⲉⲓ̅ⲥ̅ <text:line-break/><text:span text:style-name="T1"> </text:span><text:span text:style-name="T2">(51/9) </text:span> ϫⲱ ⲙⲙⲟⲥ ϫⲉ ⲡⲉⲧⲁϩⲉ ⲉⲣⲟϥ’ ⲟⲩⲁⲁϥ ⲡⲕⲟⲥ‐ <text:line-break/><text:span text:style-name="T1"> </text:span><text:span text:style-name="T2">(51/10) </text:span> ⲙⲟⲥ ⲙⲡϣⲁ ⲙⲙⲟϥ’ ⲁⲛ ⲡⲉϫⲉ ⲓ̅ⲥ̅ ϫⲉ ⲟⲩⲟⲉⲓ <text:line-break/><text:span text:style-name="T1"> </text:span><text:span text:style-name="T2">(51/11) </text:span> ⲛⲧⲥⲁⲣⲝ’ ⲧⲁⲉⲓ ⲉⲧⲟϣⲉ ⲛⲧⲯⲩⲭⲏ ⲟⲩⲟⲉⲓ <text:line-break/><text:span text:style-name="T1"> </text:span><text:span text:style-name="T2">(51/12) </text:span> ⲛⲧⲯⲩⲭⲏ ⲧⲁⲉⲓ ⲉⲧⲟϣⲉ ⲛⲧⲥⲁⲣⲝ ⲡⲉϫⲁⲩ <text:line-break/><text:span text:style-name="T1"> </text:span><text:span text:style-name="T2">(51/13) </text:span> ⲛⲁϥ ⲛϭⲓ ⲛⲉϥⲙⲁⲑⲏⲧⲏⲥ ϫⲉ ⲧⲙⲛⲧⲉⲣⲟ <text:line-break/><text:span text:style-name="T1"> </text:span><text:span text:style-name="T2">(51/14) </text:span> ⲉⲥⲛⲛⲏⲩ ⲛⲁϣ ⲛϩⲟⲟⲩ 〈ⲡⲉϫⲉ ⲓ̅ⲥ̅ ϫⲉ〉 ⲉⲥⲛⲛⲏⲩ ⲁⲛ ϩⲛ ⲟⲩ‐ <text:line-break/><text:span text:style-name="T1"> </text:span><text:span text:style-name="T2">(51/15) </text:span> ϭⲱϣⲧ’ ⲉⲃⲟⲗ’ ⲉⲩⲛⲁϫⲟⲟⲥ ⲁⲛ ϫⲉ ⲉⲓⲥϩⲏⲏ‐ <text:line-break/><text:soft-page-break/><text:span text:style-name="T1"> </text:span><text:span text:style-name="T2">(51/16) </text:span> ⲧⲉ ⲙⲡⲓⲥⲁ ⲏ ⲉⲓⲥϩⲏⲏⲧⲉ ⲧⲏ ⲁⲗⲗⲁ ⲧⲙⲛⲧⲉⲣⲟ <text:line-break/><text:span text:style-name="T1"> </text:span><text:span text:style-name="T2">(51/17) </text:span> ⲙⲡⲉⲓⲱⲧ’ ⲉⲥⲡⲟⲣϣ’ ⲉⲃⲟⲗ ϩⲓϫⲙ ⲡⲕⲁϩ ⲁⲩⲱ <text:line-break/><text:span text:style-name="T1"> </text:span><text:span text:style-name="T2">(51/18) </text:span> ⲣⲣⲱⲙⲉ ⲛⲁⲩ ⲁⲛ ⲉⲣⲟⲥ ⲡⲉϫⲉ ⲥⲓⲙⲱⲛ ⲡⲉⲧⲣⲟⲥ <text:line-break/><text:span text:style-name="T1"> </text:span><text:span text:style-name="T2">(51/19) </text:span> ⲛⲁⲩ ϫⲉ ⲙⲁⲣⲉ ⲙⲁⲣⲓϩⲁⲙ ⲉⲓ ⲉⲃⲟⲗ ⲛϩⲏⲧⲛ <text:line-break/><text:span text:style-name="T1"> </text:span><text:span text:style-name="T2">(51/20) </text:span> ϫⲉ ⲛⲥϩⲓⲟⲙⲉ ⲙⲡϣⲁ ⲁⲛ’ ⲙⲡⲱⲛϩ ⲡⲉϫⲉ ⲓ̅ⲥ̅ <text:line-break/><text:span text:style-name="T1"> </text:span><text:span text:style-name="T2">(51/21) </text:span> ϫⲉ ⲉⲓⲥϩⲏⲏⲧⲉ ⲁⲛⲟⲕ’ ϯⲛⲁⲥⲱⲕ’ ⲙⲙⲟⲥ ϫⲉ‐ <text:line-break/><text:span text:style-name="T1"> </text:span><text:span text:style-name="T2">(51/22) </text:span> ⲕⲁⲁⲥ ⲉⲉⲓⲛⲁⲁⲥ ⲛϩⲟⲟⲩⲧ’ ϣⲓⲛⲁ ⲉⲥⲛⲁϣⲱ‐ <text:line-break/><text:span text:style-name="T1"> </text:span><text:span text:style-name="T2">(51/23) </text:span> ⲡⲉ ϩⲱⲱⲥ ⲛⲟⲩⲡⲛ̅ⲁ̅ ⲉϥⲟⲛϩ ⲉϥⲉⲓⲛⲉ ⲙ‐ <text:line-break/><text:span text:style-name="T1"> </text:span><text:span text:style-name="T2">(51/24) </text:span> ⲙⲱⲧⲛ ⲛϩⲟⲟⲩⲧ ϫⲉ ⲥϩⲓⲙⲉ ⲛⲓⲙ’ ⲉⲥⲛⲁⲁⲥ <text:line-break/><text:span text:style-name="T1"> </text:span><text:span text:style-name="T2">(51/25) </text:span> ⲛϩⲟⲟⲩⲧ’ ⲥⲛⲁⲃⲱⲕ’ ⲉϩⲟⲩⲛ ⲉⲧⲙⲛ̅ⲧ̅ⲉⲣⲟ <text:line-break/><text:span text:style-name="T1"> </text:span><text:span text:style-name="T2">(51/26) </text:span> ⲛⲙⲡⲏⲩⲉ <text:line-break/><text:span text:style-name="T1"> </text:span><text:span text:style-name="T2">(51/27) </text:span> ⲡⲉⲩⲁⲅⲅⲉⲗⲓⲟⲛ <text:line-break/><text:span text:style-name="T1"> </text:span><text:span text:style-name="T2">(51/28) </text:span> ⲡⲕⲁⲧⲁ ⲑⲱⲙⲁⲥ </text:p>
      <text:p text:style-name="P4">( codex II ) The Gospel of Philip</text:p>
      <text:p text:style-name="P3"><text:span text:style-name="T1"> </text:span><text:span text:style-name="T2">(51/29) </text:span> §ⲟⲩϩⲉⲃⲣⲁⲓⲟⲥ ⲣ̅ⲣⲱⲙⲉ [ϣ]ⲁ̣ϥⲧⲁⲙⲓⲉ ϩⲉⲃⲣⲁⲓ‐ <text:line-break/><text:span text:style-name="T1"> </text:span><text:span text:style-name="T2">(51/30) </text:span> ⲟⲥ ⲁⲩⲱ ϣⲁⲩⲙⲟⲩⲧⲉ [ⲉⲛⲁ]ⲉⲓ ⲛ̅ⲧⲉⲉⲓⲙⲓⲛⲉ <text:line-break/><text:span text:style-name="T1"> </text:span><text:span text:style-name="T2">(51/31) </text:span> ϫⲉ ⲡⲣⲟⲥⲏⲗⲩⲧⲟⲥ ⲟⲩⲡ[ⲣⲟⲥⲏ]ⲗ̣ⲩⲧⲟⲥ ⲇⲉ ⲙⲁϥ‐ <text:line-break/><text:span text:style-name="T1"> </text:span><text:span text:style-name="T2">(51/32) </text:span> ⲧⲁⲙⲓⲉ ⲡⲣⲟⲥⲏⲗⲩⲧⲟⲥ̣ [......].ⲉ ⲙⲉ̣ⲛ <text:line-break/><text:span text:style-name="T1"> </text:span><text:span text:style-name="T2">(51/33) </text:span> ⲥⲉϣⲟⲟⲡ ⲛ̅ⲑⲉ ⲉⲧⲟⲩϣ[.........] <text:line-break/><text:span text:style-name="T1"> </text:span><text:span text:style-name="T2">(51/34) </text:span> ⲁⲩⲱ ⲥⲉⲧⲁⲙⲉⲓⲟ ⲛ̅ϩⲛ̅ⲕⲟⲟ̣[ⲩⲉ .......] <text:line-break/><text:span text:style-name="T1"> </text:span><text:span text:style-name="T2">(52/1) </text:span> [ⲇⲉ] ⲙⲟⲛ̣ⲟ̣[ⲛ ⲉⲥ]ⲣ̣ⲱϣⲉ ⲉⲣⲟⲟⲩ ϣⲓⲛⲁ ⲉⲩⲛⲁ‐ <text:line-break/><text:span text:style-name="T1"> </text:span><text:span text:style-name="T2">(52/2) </text:span> ϣⲱⲡⲉ’ §ⲡ[ϩⲙ]ϩ̣̅̅ⲁ̅ⲗ̅ ⲙⲟⲛⲟⲛ ⲉϥϣⲓⲛⲉ ⲁⲣ̅ⲉ‐ <text:line-break/><text:span text:style-name="T1"> </text:span><text:span text:style-name="T2">(52/3) </text:span> ⲗⲉⲩⲑⲉⲣ̣ⲟ[ⲥ] ⲙ̣ⲁϥϣⲓⲛⲉ ⲇⲉ ⲛ̅ⲥⲁ ⲧⲟⲩⲥⲓⲁ <text:line-break/><text:span text:style-name="T1"> </text:span><text:span text:style-name="T2">(52/4) </text:span> ⲙ̅ⲡⲉϥϫⲟ[ⲉⲓ]ⲥ ⲡϣⲏⲣⲉ ⲇⲉ ⲟⲩ ⲙⲟⲛⲟⲛ ϫⲉ <text:line-break/><text:span text:style-name="T1"> </text:span><text:span text:style-name="T2">(52/5) </text:span> ϥⲟ ⲛ̅ϣⲏⲣⲉ ⲁⲗⲗⲁ ⲧⲕⲗⲏⲣⲟⲛⲟⲙⲉⲓⲁ ⲙ̅ⲡⲉⲓ‐ <text:line-break/><text:span text:style-name="T1"> </text:span><text:span text:style-name="T2">(52/6) </text:span> ⲱⲧ’ ϣⲁϥⲥⲁϩⲥ̅ ⲛ̅ⲥⲱϥ’ ⲛⲉⲧⲣ̅ⲕⲗⲏⲣⲟⲛⲟⲙⲉⲓ <text:line-break/><text:span text:style-name="T1"> </text:span><text:span text:style-name="T2">(52/7) </text:span> ⲛ̅ⲛⲉⲧ’ⲙⲟⲟⲩⲧ’ ⲛ̅ⲧⲟⲟⲩ ϩⲱⲟⲩ ⲥⲉⲙⲟⲟⲩⲧ’ <text:line-break/><text:span text:style-name="T1"> </text:span><text:span text:style-name="T2">(52/8) </text:span> ⲁⲩⲱ ⲉⲩⲕⲗⲏⲣⲟⲛⲟⲙⲉⲓ ⲛ̅ⲛⲉⲧ’ⲙⲟⲟⲩⲧ’ ⲛⲉ‐ <text:line-break/><text:span text:style-name="T1"> </text:span><text:span text:style-name="T2">(52/9) </text:span> ⲧⲣ̅ⲕⲗⲏⲣⲟⲛⲟⲙⲉⲓ ⲙ̅ⲡⲉⲧⲟⲛϩ ⲛ̅ⲧⲟⲟⲩ ⲥⲉⲟⲛϩ <text:line-break/><text:span text:style-name="T1"> </text:span><text:span text:style-name="T2">(52/10) </text:span> ⲁⲩⲱ ⲥⲉⲣ̅ⲕⲗⲏⲣⲟⲛⲟⲙⲉⲓ ⲙ̅ⲡⲉⲧⲟⲛϩ ⲙⲛ̅ ⲛⲉⲧ’‐ <text:line-break/><text:span text:style-name="T1"> </text:span><text:span text:style-name="T2">(52/11) </text:span> ⲙⲟⲟⲩⲧ’ ⲛⲉⲧⲙⲟⲟⲩⲧ’ ⲙⲁⲩⲣ̅ⲕⲗⲏⲣⲟⲛⲟⲙⲉⲓ <text:line-break/><text:span text:style-name="T1"> </text:span><text:span text:style-name="T2">(52/12) </text:span> ⲗ̅ⲗⲁⲁⲩ ⲡ̣ⲱⲥ ⲅⲁⲣ ⲡⲉⲧⲙⲟⲟⲩⲧ’ ϥⲛⲁⲕⲗⲏⲣⲟⲛⲟ‐ <text:line-break/><text:span text:style-name="T1"> </text:span><text:span text:style-name="T2">(52/13) </text:span> ⲙⲉⲓ ⲡⲉⲧⲙⲟⲟⲩⲧ’ ⲉϥϣⲁⲕⲗⲏⲣⲟⲛⲟⲙⲉⲓ ⲙ̅‐ <text:line-break/><text:span text:style-name="T1"> </text:span><text:span text:style-name="T2">(52/14) </text:span> ⲡⲉⲧⲟⲛϩ ϥⲛⲁⲙⲟⲩ ⲁⲛ ⲁⲗⲗⲁ ⲡⲉⲧⲙⲟⲟⲩⲧ’ <text:line-break/><text:span text:style-name="T1"> </text:span><text:span text:style-name="T2">(52/15) </text:span> ⲉϥⲛⲁⲱⲛϩ ⲛ̅ϩⲟⲩⲟ §ⲟⲩϩⲉⲑⲛⲓⲕⲟⲥ ⲣ̅ⲣⲱ‐ <text:line-break/><text:span text:style-name="T1"> </text:span><text:span text:style-name="T2">(52/16) </text:span> ⲙⲉ ⲙⲁϥⲙⲟⲩ ⲙ̅ⲡⲉϥⲱⲛϩ ⲅⲁⲣ ⲉⲛⲉϩ ϩⲓⲛⲁ <text:line-break/><text:span text:style-name="T1"> </text:span><text:span text:style-name="T2">(52/17) </text:span> ⲉϥⲛⲁⲙⲟⲩ’ ⲡⲉⲛⲧⲁϩⲡⲓⲥⲧⲉⲩⲉ ⲉⲧⲙⲉ ⲁϥ’‐ <text:line-break/><text:span text:style-name="T1"> </text:span><text:span text:style-name="T2">(52/18) </text:span> ⲱⲛϩ ⲁⲩⲱ ⲡⲁⲓ̈ ϥϭⲛ̅ⲇⲩⲛⲉⲩⲉ ⲉⲙⲟⲩ ϥⲟⲛϩ <text:line-break/><text:span text:style-name="T1"> </text:span><text:span text:style-name="T2">(52/19) </text:span> ⲅⲁⲣ ϫⲓⲙ̅ ⲡϩⲟⲟⲩ ⲛ̅ⲧⲁ ⲡⲭ̅ⲥ̅ ⲉⲓ ⲥⲉⲥⲱⲛⲧ’ ⲙ̅‐ <text:line-break/><text:span text:style-name="T1"> </text:span><text:span text:style-name="T2">(52/20) </text:span> ⲡⲕⲟⲥⲙⲟⲥ ⲥⲉⲣ̅ⲕⲟⲥⲙⲉⲓ ⲛⲙ̅ⲡⲟⲗⲉⲓⲥ ⲥⲉ‐ <text:line-break/><text:span text:style-name="T1"> </text:span><text:span text:style-name="T2">(52/21) </text:span> ϥⲓ ⲙ̅ⲡⲉⲧⲙⲟⲟⲩⲧ’ ⲉⲃⲟⲗ’ ⲛ̅ϩⲟⲟⲩ ⲛⲉⲛ’ϣⲟ‐ <text:line-break/><text:span text:style-name="T1"> </text:span><text:span text:style-name="T2">(52/22) </text:span> ⲟⲡ’ ⲛ̅ϩⲉⲃⲣⲁⲓⲟⲥ’ ⲛⲉⲛⲟ ⲛ̅ⲟⲣⲫⲁⲛⲟⲥ ⲛⲉⲩ‐ <text:line-break/><text:span text:style-name="T1"> </text:span><text:span text:style-name="T2">(52/23) </text:span> ⲛ̅ⲧⲁⲛ ⲛ̅ⲧⲙ̅ⲙⲁⲁⲩ ⲛ̅ⲧⲁⲣⲛ̅ϣⲱⲡⲉ ⲇⲉ ⲛ̅‐ <text:line-break/><text:span text:style-name="T1"> </text:span><text:span text:style-name="T2">(52/24) </text:span> ⲭⲣⲏⲥⲧⲓⲁⲛⲟⲥ ⲁⲉⲓⲱⲧ’ ϩⲓ ⲙⲁⲁⲩ ϣⲱⲡⲉ ⲛⲁⲛ <text:line-break/><text:span text:style-name="T1"> </text:span><text:span text:style-name="T2">(52/25) </text:span> §ⲛⲉⲧⲥⲓⲧⲉ ϩⲛ̅ ⲧⲡⲣⲱ ϣⲁⲩⲱⲥϩ ϩⲙ̅ ⲡϣⲱⲙ’ <text:line-break/><text:span text:style-name="T1"> </text:span><text:span text:style-name="T2">(52/26) </text:span> ⲧⲡⲣⲱ ⲡⲉ ⲡⲕⲟⲥⲙⲟⲥ ⲡϣⲱⲙ’ ⲡⲉ ⲡⲕⲉⲁⲓ‐ <text:line-break/><text:span text:style-name="T1"> </text:span><text:span text:style-name="T2">(52/27) </text:span> ⲱⲛ’ ⲙⲁⲣⲛ̅ⲥⲓⲧⲉ ϩⲙ̅ ⲡⲕⲟⲥⲙⲟⲥ ϫⲉⲕⲁⲁⲥ <text:line-break/><text:span text:style-name="T1"> </text:span><text:span text:style-name="T2">(52/28) </text:span> ⲉⲛⲛⲁⲱϩⲥ ϩⲙ̅ ⲡϣⲱⲙ’ ⲇⲓⲁ ⲧⲟⲩⲧⲟ ϣϣⲉ <text:line-break/><text:span text:style-name="T1"> </text:span><text:span text:style-name="T2">(52/29) </text:span> ⲉⲣⲟⲛ’ ⲉⲧⲙ̅ⲧⲣⲛ̅ϣⲗⲏⲗ’ ϩⲛ̅ ⲧⲡⲣⲱ ⲡⲓⲉⲃⲟⲗ <text:line-break/><text:span text:style-name="T1"> </text:span><text:span text:style-name="T2">(52/30) </text:span> ϩⲛ̅ ⲧⲡⲣⲱ’ ⲡⲉ ⲡϣⲱⲙ’ ⲉⲣϣⲁ ⲟⲩⲁ ⲇⲉ ⲱⲥϩ <text:line-break/><text:span text:style-name="T1"> </text:span><text:span text:style-name="T2">(52/31) </text:span> ϩⲛ̅ ⲧⲉⲡⲣⲱ’ ⲉϥⲛⲁⲱⲥϩ ⲁⲛ ⲁⲗⲗⲁ ⲉϥⲛⲁϩⲱ‐ <text:line-break/><text:span text:style-name="T1"> </text:span><text:span text:style-name="T2">(52/32) </text:span> ⲗⲉ ϩⲱⲥ ⲡⲁⲉ̣[ⲓ ⲛ̅]ⲧⲉⲉⲓⲙⲉⲓⲛⲉ ⲉϥⲛⲁⲧⲉⲩ‐ <text:line-break/><text:span text:style-name="T1"> </text:span><text:span text:style-name="T2">(52/33) </text:span> ⲉ ⲕⲁⲣⲡⲟⲥ̣ [ⲛⲁϥ’] ⲁⲛ’ ⲟⲩ ⲙⲟⲛⲟⲛ ⲉϥⲛ̅ⲛⲏⲩ <text:line-break/><text:span text:style-name="T1"> </text:span><text:span text:style-name="T2">(52/34) </text:span> ⲉⲃⲟ̣[ⲗ ......] ⲁⲗⲗⲁ ϩⲙ̅ ⲡⲕⲉⲥⲁⲃⲃⲁⲧⲟⲛ <text:line-break/><text:span text:style-name="T1"> </text:span><text:span text:style-name="T2">(52/35) </text:span> [....... ⲟ]ⲩ̣ⲁⲧⲕⲁⲣⲡⲟⲥ ⲧⲉ §ⲁⲡⲉⲭⲣ̅ⲥ̅ ⲉⲓ <text:line-break/><text:span text:style-name="T1"> </text:span><text:span text:style-name="T2">(53/1) </text:span> ϩⲟⲉⲓⲛⲉ ⲙⲉⲛ ⲉⲧⲣⲉϥⲧⲟⲟⲩⲥ[ⲉ ϩ]ⲛ̅ⲕⲟⲟⲩⲉ <text:line-break/><text:span text:style-name="T1"> </text:span><text:span text:style-name="T2">(53/2) </text:span> ⲇⲉ ⲉⲧⲣⲉϥ’ⲛⲁϩⲙⲟⲩ ϩⲛ̅ⲕⲟⲟⲩ̣ⲉ ⲉⲧⲣⲉϥⲥⲟ‐ <text:line-break/><text:span text:style-name="T1"> </text:span><text:span text:style-name="T2">(53/3) </text:span> ⲧⲟⲩ ⲛⲉⲧⲟ ⲛ̅ϣⲙ̅ⲙⲟ ⲛ̅ⲧⲁϥⲧⲟⲟⲩⲥⲉ ⲁϥⲁ‐ <text:line-break/><text:span text:style-name="T1"> </text:span><text:span text:style-name="T2">(53/4) </text:span> ⲁⲩ ⲛ̅ⲛⲉⲧⲉ ⲛⲟⲩϥ ⲛⲉ ⲁⲩⲱ ⲁϥⲛⲟⲩϩ’ <text:line-break/><text:span text:style-name="T1"> </text:span><text:span text:style-name="T2">(53/5) </text:span> † ⲛ̅ⲛ̅ⲉⲧⲉ ⲛⲟⲩϥ ⲛⲁⲉⲓ ⲛ̅ⲧⲁϥⲕⲁⲁⲩ ⲛ̅ⲛⲉⲟⲩ‐ <text:line-break/><text:soft-page-break/><text:span text:style-name="T1"> </text:span><text:span text:style-name="T2">(53/6) </text:span> ⲱ ϩⲙ̅ ⲡⲉϥ’ⲟⲩⲱϣ’ ⲟⲩ ⲙⲟⲛⲟⲛ ϫⲉ ⲛ̅ⲧⲁⲣⲉϥ’‐ <text:line-break/><text:span text:style-name="T1"> </text:span><text:span text:style-name="T2">(53/7) </text:span> ⲟⲩⲱⲛϩ ⲉⲃⲟⲗ ⲁϥⲕⲱ ⲛ̅ⲧⲯⲩⲭⲏ ⲛ̅ⲧⲁⲣⲉϥ’‐ <text:line-break/><text:span text:style-name="T1"> </text:span><text:span text:style-name="T2">(53/8) </text:span> ⲟⲩⲱϣ ⲁⲗⲗⲁ ϫⲓⲙ ⲫⲟⲟⲩ ⲉⲡⲕⲟⲥⲙⲟⲥ ϣⲟ‐ <text:line-break/><text:span text:style-name="T1"> </text:span><text:span text:style-name="T2">(53/9) </text:span> ⲟⲡ’ ⲁϥⲕⲱ ⲛ̅ⲧⲯⲩⲭⲏ ⲙ̅ⲡⲥⲟⲡ’ ⲉⲧⲉϥ’ⲟⲩ‐ <text:line-break/><text:span text:style-name="T1"> </text:span><text:span text:style-name="T2">(53/10) </text:span> ⲱϣ’ ⲧⲟⲧⲉ ⲁϥⲉⲓ ⲛ̅ϣⲟⲣⲡ’ ⲉϥⲛⲁϥⲓⲧⲥ̅ ⲉⲡⲉⲓ <text:line-break/><text:span text:style-name="T1"> </text:span><text:span text:style-name="T2">(53/11) </text:span> ⲛ̅ⲧⲁⲩⲕⲁⲁⲥ ⲛ̅ⲛⲉⲟⲩⲱ’ ⲁⲥϣⲱⲡⲉ ϩⲁ ⲛⲗⲏ‐ <text:line-break/><text:span text:style-name="T1"> </text:span><text:span text:style-name="T2">(53/12) </text:span> ⲥⲧⲏⲥ ⲁⲩⲱ ⲁⲩϥⲓⲧⲥ̅ ⲛ̅ⲁⲓⲭⲙⲁⲗⲱⲧⲟⲥ ⲁϥⲛⲟϩ‐ <text:line-break/><text:span text:style-name="T1"> </text:span><text:span text:style-name="T2">(53/13) </text:span> ⲙⲉⲥ ⲇⲉ ⲁⲩⲱ ⲛⲉⲧⲛⲁⲛⲟⲩⲟⲩ ϩⲙ̅ ⲡⲕⲟⲥⲙⲟⲥ <text:line-break/><text:span text:style-name="T1"> </text:span><text:span text:style-name="T2">(53/14) </text:span> ⲁϥⲥⲟⲧⲟⲩ ⲁⲩⲱ ⲛⲉⲑⲟⲟⲩ §ⲡⲟⲩⲟⲉⲓⲛ ⲙⲛ̅ ⲡⲕⲁ‐ <text:line-break/><text:span text:style-name="T1"> </text:span><text:span text:style-name="T2">(53/15) </text:span> ⲕⲉ ⲡⲱⲛϩ ⲙⲛ̅ ⲡⲙⲟⲩ ⲛ̅ⲟⲩⲛⲁⲙ’ ⲙⲛ̅ ⲛ̅ϩⲃⲟⲩⲣ <text:line-break/><text:span text:style-name="T1"> </text:span><text:span text:style-name="T2">(53/16) </text:span> ⲛ̅ⲥⲛⲏⲩ ⲛⲉ ⲛ̅ⲛⲟⲩⲉⲣⲏⲩ ⲙⲛ̅ ϭⲟⲙ’ ⲛ̅ⲥⲉⲡⲱⲣϫ <text:line-break/><text:span text:style-name="T1"> </text:span><text:span text:style-name="T2">(53/17) </text:span> ⲁⲛⲟⲩⲉⲣⲏⲩ’ ⲉⲧⲃⲉ ⲡⲁⲉⲓ ⲟⲩⲧⲉ ⲛⲉⲧⲛⲁⲛⲟⲩ‐ <text:line-break/><text:span text:style-name="T1"> </text:span><text:span text:style-name="T2">(53/18) </text:span> ⲟⲩ ⲛⲁⲛⲟⲩⲟⲩ ⲟⲩⲧⲉ ⲛⲉⲑⲟⲟⲩ ⲥⲉϩⲟⲟⲩ <text:line-break/><text:span text:style-name="T1"> </text:span><text:span text:style-name="T2">(53/19) </text:span> ⲟⲩⲧⲉ ⲡⲱⲛϩ ⲟⲩⲱⲛϩ ⲡⲉ ⲟⲩⲧⲉ ⲡⲙⲟⲩ ⲟⲩ‐ <text:line-break/><text:span text:style-name="T1"> </text:span><text:span text:style-name="T2">(53/20) </text:span> ⲙⲟⲩ ⲡⲉ ⲇⲓⲁ ⲧⲟⲩⲧⲟ ⲡⲟⲩⲁ ⲡⲟⲩⲁ ⲛⲁⲃⲱⲗ <text:line-break/><text:span text:style-name="T1"> </text:span><text:span text:style-name="T2">(53/21) </text:span> ⲉⲃⲟⲗ’ ⲁⲧⲉϥⲁⲣⲭⲏ ϫⲓⲛ ϣⲟⲣⲡ’ ⲛⲉⲧϫⲟⲥⲉ <text:line-break/><text:span text:style-name="T1"> </text:span><text:span text:style-name="T2">(53/22) </text:span> ⲇⲉ ⲁⲡⲕⲟⲥⲙⲟⲥ ϩⲛ̅ⲛⲁⲧⲃⲱⲗ ⲉⲃⲟⲗ ⲛⲉ <text:line-break/><text:span text:style-name="T1"> </text:span><text:span text:style-name="T2">(53/23) </text:span> ϩⲛ̅ϣⲁ ⲉⲛⲉϩ ⲛⲉ §ⲛ̅ⲣⲁⲛ ⲉⲧⲟⲩϯ ⲙ̅ⲙⲟⲟⲩ ⲁⲛ‐ <text:line-break/><text:span text:style-name="T1"> </text:span><text:span text:style-name="T2">(53/24) </text:span> ⲕⲟⲥⲙⲓⲕⲟⲥ ⲟⲩⲛ̅ⲧⲉⲩ ⲙ̅ⲙⲁⲩ ⲛ̅ⲟⲩⲛⲟϭ ⲙ̅‐ <text:line-break/><text:span text:style-name="T1"> </text:span><text:span text:style-name="T2">(53/25) </text:span> ⲡⲗⲁⲛⲏ ⲥⲉⲡⲱϣⲥ̅ ⲅⲁⲣ ⲙ̅ⲡⲟⲩϩⲏⲧ’ ⲉⲃⲟⲗ <text:line-break/><text:span text:style-name="T1"> </text:span><text:span text:style-name="T2">(53/26) </text:span> ϩⲛ̅ ⲛⲉⲧⲥⲙⲟⲛⲧ’ ⲉϩⲟⲩⲛ ⲉⲛⲉⲧⲥⲙⲟⲛⲧ’ <text:line-break/><text:span text:style-name="T1"> </text:span><text:span text:style-name="T2">(53/27) </text:span> ⲁⲛ ⲁⲩⲱ ⲡⲉⲧⲥⲱⲧⲙ̅ ⲉⲡⲛⲟⲩⲧⲉ ⲉϥⲛⲟ‐ <text:line-break/><text:span text:style-name="T1"> </text:span><text:span text:style-name="T2">(53/28) </text:span> ⲉⲓ ⲁⲛ ⲙ̅ⲡⲉⲧⲥⲙⲟⲛⲧ’ ⲁⲗⲗⲁ ⲁϥⲣ̅ⲛⲟⲉⲓ ⲙ̅‐ <text:line-break/><text:span text:style-name="T1"> </text:span><text:span text:style-name="T2">(53/29) </text:span> ⲡⲉⲧ’ⲥⲙⲟⲛⲧ ⲁⲛ ⲧⲉⲉⲓϩⲉ ⲟⲛ ⲙ̅ⲡⲉⲓⲱⲧ’ <text:line-break/><text:span text:style-name="T1"> </text:span><text:span text:style-name="T2">(53/30) </text:span> ⲙⲛ̅ ⲡϣⲏⲣⲉ ⲙⲛ̅ ⲡⲡⲛ̣̅̅ⲁ̅ ⲉⲧⲟⲩⲁⲁⲃ ⲙⲛ̅ <text:line-break/><text:span text:style-name="T1"> </text:span><text:span text:style-name="T2">(53/31) </text:span> ⲡⲱⲛϩ ⲙⲛ̅ ⲡⲟⲩⲟⲉⲓⲛ ⲁⲩⲱ ⲧⲁⲛⲁⲥⲧⲁ‐ <text:line-break/><text:span text:style-name="T1"> </text:span><text:span text:style-name="T2">(53/32) </text:span> ⲥⲓⲥ ⲙⲛ̅ ⲧⲉⲕⲕⲗⲏⲥⲓⲁ̣ [ⲙ]ⲛ̣̅ ⲛ̅ⲕⲟⲟⲩⲉ ⲧⲏⲣⲟⲩ <text:line-break/><text:span text:style-name="T1"> </text:span><text:span text:style-name="T2">(53/33) </text:span> ⲉⲩⲣ̅ⲛⲟⲉⲓ ⲁⲛ ⲛ̅ⲛⲉⲧ̣[ⲥⲙⲟ]ⲛ̣ⲧ’ ⲁⲗⲗⲁ ⲉⲩⲣ̅‐ <text:line-break/><text:span text:style-name="T1"> </text:span><text:span text:style-name="T2">(53/34) </text:span> ⲛⲟⲉⲓ ⲛ̅ⲛⲉⲧ’ⲥⲙⲟⲛ[ⲧ’ ⲁⲛ ⲡⲗ]ⲏⲛ’ ⲁⲩⲥⲉ‐ <text:line-break/><text:span text:style-name="T1"> </text:span><text:span text:style-name="T2">(53/35) </text:span> ⲃⲟ ⲁⲛⲉⲧⲥⲙⲟⲛⲧ’ ⲣ̅ⲣ̣ⲁ̣[ⲛ ⲛ̅ⲧⲁⲩⲥ]ⲁ̣ⲧⲙⲟⲩ <text:line-break/><text:span text:style-name="T1"> </text:span><text:span text:style-name="T2">(53/36) </text:span> ⲥⲉϣⲟⲟⲡ’ ϩⲙ̅ ⲡⲕⲟⲥⲙⲟ[ⲥ .......] <text:line-break/><text:span text:style-name="T1"> </text:span><text:span text:style-name="T2">(54/1) </text:span> [ⲁⲡ]ⲁ̣ⲧ̣ⲁ [ⲉ]ⲛ̣[ⲉⲩ]ϣ[ⲟ]ⲟⲡ’ ϩⲙ̅ ⲡⲁⲓⲱⲛ ⲛⲉⲩⲛⲁ‐ <text:line-break/><text:span text:style-name="T1"> </text:span><text:span text:style-name="T2">(54/2) </text:span> ⲣ̣̅ⲟⲛⲟⲙⲁⲍ̣[ⲉ] ⲁⲛ ϩⲙ̅ ⲡⲕⲟⲥⲙⲟⲥ ⲗ̅ⲗⲁⲁⲩ ⲛ̅‐ <text:line-break/><text:span text:style-name="T1"> </text:span><text:span text:style-name="T2">(54/3) </text:span> ϩⲟⲟⲩ ⲟⲩⲧⲉ ⲙ̅ⲡⲟⲩⲕⲁⲁⲩ ϩⲛ̅ ⲛ̅ϩⲃⲏⲩⲉ ⲛ̅‐ <text:line-break/><text:span text:style-name="T1"> </text:span><text:span text:style-name="T2">(54/4) </text:span> ⲕⲟⲥⲙⲓⲕⲟⲛ ⲟⲩⲛ̅ⲧⲁⲩ ⲙ̅ⲙⲁⲩ ⲛ̅ⲛⲟⲩϩⲁⲏ ϩⲙ̅ <text:line-break/><text:span text:style-name="T1"> </text:span><text:span text:style-name="T2">(54/5) </text:span> ⲡⲁⲓⲱⲛ §ⲟⲩⲣⲁⲛ’ ⲟⲩⲱⲧ’ ⲙⲁⲩⲧⲉⲩⲟⲩⲁϥ’ <text:line-break/><text:span text:style-name="T1"> </text:span><text:span text:style-name="T2">(54/6) </text:span> ϩⲙ̅ ⲡⲕⲟⲥⲙⲟⲥ ⲡⲣⲁⲛ’ ⲛ̅ⲧⲁ ⲡⲉⲓⲱⲧ’ ⲧⲁⲁϥ’ <text:line-break/><text:span text:style-name="T1"> </text:span><text:span text:style-name="T2">(54/7) </text:span> ⲙ̅ⲡϣⲏⲣⲉ ϥϫⲟⲥⲉ ⲉⲟⲩⲟⲛ ⲛⲓⲙ’ ⲉⲧⲉ ⲡⲁ‐ <text:line-break/><text:span text:style-name="T1"> </text:span><text:span text:style-name="T2">(54/8) </text:span> ⲉⲓ ⲡⲉ ⲡⲣⲁⲛ’ ⲙ̅ⲡⲉⲓⲱⲧ’ ⲛⲉⲣⲉ ⲡϣⲏⲣⲉ ⲅⲁⲣ’ <text:line-break/><text:span text:style-name="T1"> </text:span><text:span text:style-name="T2">(54/9) </text:span> ⲛⲁϣⲱⲡⲉ ⲁⲛ’ ⲉⲓⲱⲧ’ ⲥⲁⲃⲏⲗ ϫⲉ ⲁϥϯ ϩⲓ‐ <text:line-break/><text:span text:style-name="T1"> </text:span><text:span text:style-name="T2">(54/10) </text:span> ⲱⲱϥ’ ⲙ̅ⲡⲣⲁⲛ ⲙ̅ⲡⲉⲓⲱⲧ’ ⲡⲉⲉⲓⲣⲁⲛ ⲛⲉ‐ <text:line-break/><text:span text:style-name="T1"> </text:span><text:span text:style-name="T2">(54/11) </text:span> ⲧⲉⲩⲛ̅ⲧⲁⲩϥ ⲥⲉⲣ̅ⲛⲟⲉⲓ ⲙⲉⲛ’ ⲙ̅ⲙⲟϥ ⲥⲉϣⲁ‐ <text:line-break/><text:span text:style-name="T1"> </text:span><text:span text:style-name="T2">(54/12) </text:span> ϫⲉ ⲇⲉ ⲉⲣⲟϥ ⲁⲛ ⲛⲉⲧⲉ ⲙⲛ̅ⲧⲁⲩϥ ⲇⲉ ⲥⲉ‐ <text:line-break/><text:span text:style-name="T1"> </text:span><text:span text:style-name="T2">(54/13) </text:span> ⲣ̅ⲛⲟⲉⲓ ⲙ̅ⲙⲟϥ ⲁⲛ §ⲁⲗⲗⲁ ⲁⲧⲙⲉ ϫⲡⲉ ϩⲉⲛⲣⲁⲛ <text:line-break/><text:span text:style-name="T1"> </text:span><text:span text:style-name="T2">(54/14) </text:span> ϩⲙ̅ ⲡⲕⲟⲥⲙⲟⲥ ⲉⲧⲃⲏⲧⲛ̅ † ⲛⲁⲉⲓ ⲉⲙⲛ̅ ϭⲟⲙ’ <text:line-break/><text:span text:style-name="T1"> </text:span><text:span text:style-name="T2">(54/15) </text:span> ⲁⲥⲉⲃⲟ ⲉⲣⲟⲥ ⲭⲱⲣⲓⲥ ⲣ̅ⲣⲁⲛ ⲟⲩⲉⲓ ⲟⲩⲱⲧ’ <text:line-break/><text:span text:style-name="T1"> </text:span><text:span text:style-name="T2">(54/16) </text:span> ⲧⲉ ⲧⲙⲉ † ⲥⲟ ⲛ̅ϩⲁϩ ⲁⲩⲱ ⲉⲧⲃⲏⲧⲛ̅ ⲉⲧⲥⲉ‐ <text:line-break/><text:soft-page-break/><text:span text:style-name="T1"> </text:span><text:span text:style-name="T2">(54/17) </text:span> ⲃⲟ ⲉⲡⲁⲉⲓ ⲟⲩⲁⲁϥ † ϩⲛ̅ ⲟⲩⲁⲅⲁⲡⲏ ϩⲓⲧⲛ̅ <text:line-break/><text:span text:style-name="T1"> </text:span><text:span text:style-name="T2">(54/18) </text:span> ϩⲁϩ ⲁⲛⲁⲣⲭⲱⲛ ⲟⲩⲱϣ ⲁⲣ̅ⲁⲡⲁⲧⲁ ⲙ̅‐ <text:line-break/><text:span text:style-name="T1"> </text:span><text:span text:style-name="T2">(54/19) </text:span> ⲡⲣⲱⲙⲉ ⲉⲡⲉⲓⲇⲏ ⲁⲩⲛⲁⲩ ⲉⲣⲟϥ’ ⲉⲩⲛ̅ⲧⲁϥ’ <text:line-break/><text:span text:style-name="T1"> </text:span><text:span text:style-name="T2">(54/20) </text:span> ⲙ̅ⲙⲁⲩ ⲛ̅ⲛⲟⲩⲥⲩⲅ’ⲅⲉⲛⲉⲓⲁ ϣⲁ ⲛⲉⲧⲛⲁ‐ <text:line-break/><text:span text:style-name="T1"> </text:span><text:span text:style-name="T2">(54/21) </text:span> ⲛⲟⲩⲟⲩ ⲛⲁⲙⲉ ⲁⲩϥⲓ ⲡⲣⲁⲛ ⲛ̅ⲛⲉⲧⲛⲁ’‐ <text:line-break/><text:span text:style-name="T1"> </text:span><text:span text:style-name="T2">(54/22) </text:span> ⲛⲟⲩⲟⲩ ⲁⲩⲧⲁⲁϥ’ ⲁⲛⲉⲧⲛⲁⲛⲟⲩⲟⲩ ⲁⲛ’ <text:line-break/><text:span text:style-name="T1"> </text:span><text:span text:style-name="T2">(54/23) </text:span> ϫⲉⲕⲁⲁⲥ ϩⲓⲧⲛ̅ ⲣ̅ⲣⲁⲛ ⲉⲩⲛⲁⲣ̅’ⲁⲡⲁⲧⲁ ⲙ̅‐ <text:line-break/><text:span text:style-name="T1"> </text:span><text:span text:style-name="T2">(54/24) </text:span> ⲙⲟϥ’ ⲁⲩⲱ ⲛ̅ⲥⲉⲙⲟⲣⲟⲩ ⲉϩⲟⲩⲛ’ ⲁⲛⲉⲧⲛⲁ‐ <text:line-break/><text:span text:style-name="T1"> </text:span><text:span text:style-name="T2">(54/25) </text:span> ⲛⲟⲩⲟⲩ ⲁⲛ ⲁⲩⲱ ⲙ̅ⲙⲛ̅ⲛ̅ⲥⲱⲥ ⲉϣϫⲉ ⲉⲩ‐ <text:line-break/><text:span text:style-name="T1"> </text:span><text:span text:style-name="T2">(54/26) </text:span> ⲉⲓⲣⲉ ⲛⲁⲩ ⲛ̅ⲟⲩϩⲙⲟⲧ’ ⲛ̅ⲥⲉⲧⲣⲟⲩⲥⲉϩⲱⲟⲩ <text:line-break/><text:span text:style-name="T1"> </text:span><text:span text:style-name="T2">(54/27) </text:span> ⲉⲃⲟⲗ ⲛ̅ⲛⲉⲧⲛⲁⲛⲟⲩⲟⲩ ⲁⲛ ⲁⲩⲱ ⲛ̅ⲥⲉ‐ <text:line-break/><text:span text:style-name="T1"> </text:span><text:span text:style-name="T2">(54/28) </text:span> ⲕⲁⲁⲩ ϩⲛ̅ ⲛⲉⲧⲛⲁⲛⲟⲩⲟⲩ ⲛⲁⲉⲓ ⲛⲉⲩⲥⲟ‐ <text:line-break/><text:span text:style-name="T1"> </text:span><text:span text:style-name="T2">(54/29) </text:span> ⲟⲩⲛ ⲙ̅ⲙⲟⲟⲩ ⲛⲉⲩⲟⲩⲱϣ ⲅⲁⲣ ⲉⲧⲣⲟⲩ‐ <text:line-break/><text:span text:style-name="T1"> </text:span><text:span text:style-name="T2">(54/30) </text:span> ϥⲓ ⲡⲉⲗⲉⲩⲑⲉⲣ[ⲟ]ⲥ ⲛ̅ⲥⲉⲕⲁⲁϥ’ ⲛⲁⲩ ⲛ̅‐ <text:line-break/><text:span text:style-name="T1"> </text:span><text:span text:style-name="T2">(54/31) </text:span> ϩⲙϩ̅ⲁ̅ⲗ̅’̅ ϣⲁ ⲉⲛⲉ̣ϩ §ⲟⲩⲛ ϩⲛ̅ⲇⲩⲛⲁⲙⲓⲥ <text:line-break/><text:span text:style-name="T1"> </text:span><text:span text:style-name="T2">(54/32) </text:span> ϣⲟⲟⲡ’ ⲉⲩϯϩ̣[...] ⲡⲣⲱⲙⲉ ⲉⲥⲉⲟⲩⲱϣ <text:line-break/><text:span text:style-name="T1"> </text:span><text:span text:style-name="T2">(54/33) </text:span> ⲁⲛ’ ⲁⲧⲣⲉϥ’ⲟ̣ⲩ̣[ϫⲁⲉⲓ] ϫⲉⲕⲁⲁⲥ ⲉⲩⲛⲁϣⲱ‐ <text:line-break/><text:span text:style-name="T1"> </text:span><text:span text:style-name="T2">(54/34) </text:span> ⲡⲉ ⲉⲩ̣ⲙ[.....]ⲗ̣ ⲉⲣϣⲁ ⲡⲣⲱⲙⲉ ⲅⲁⲣ <text:line-break/><text:span text:style-name="T1"> </text:span><text:span text:style-name="T2">(54/35) </text:span> ⲟⲩϫ̣[ⲁⲉⲓ ⲛ̅ⲛⲟⲩ]ϣⲱⲡⲉ ⲛ̅ϭⲓ ϩⲛ̅ⲑⲩⲥⲓⲁ <text:line-break/><text:span text:style-name="T1"> </text:span><text:span text:style-name="T2">(54/36) </text:span> [........]ⲁⲩⲱ ⲛⲉⲩⲧⲁⲗⲉ ⲑⲏⲣⲓⲟⲛ’ <text:line-break/><text:span text:style-name="T1"> </text:span><text:span text:style-name="T2">(55/1) </text:span> ⲉϩⲣⲁⲓ̈ ⲛ̅ⲛ̅ⲇⲩⲛⲁⲙⲓⲥ ⲛⲉ [ϩ]ⲛ̣̅[ⲑ]ⲏ̣ⲣ̣ⲓ̣ⲟⲛ ⲅ̣ⲁ̣ⲣ̣ <text:line-break/><text:span text:style-name="T1"> </text:span><text:span text:style-name="T2">(55/2) </text:span> ⲛⲉ ⲛⲉⲧⲟⲩⲧⲉⲗⲟ ⲉϩⲣⲁⲓ̈ ⲛⲁ[ⲩ] ⲛⲉⲩⲧⲉⲗⲟ <text:line-break/><text:span text:style-name="T1"> </text:span><text:span text:style-name="T2">(55/3) </text:span> ⲙⲉⲛ ⲙ̅ⲙⲟⲟⲩ ⲉϩⲣⲁⲓ̈ ⲉⲩⲟⲛϩ̣ ⲛ̅ⲧⲁⲣⲟⲩⲧⲉ‐ <text:line-break/><text:span text:style-name="T1"> </text:span><text:span text:style-name="T2">(55/4) </text:span> ⲗⲟⲟⲩ ⲇⲉ ⲉϩⲣⲁⲓ̈ ⲁⲩⲙⲟⲩ ⲡⲣⲱⲙⲉ ⲁⲩⲧⲉⲗⲟϥ <text:line-break/><text:span text:style-name="T1"> </text:span><text:span text:style-name="T2">(55/5) </text:span> ⲉϩⲣⲁⲓ̈ ⲙ̅ⲡⲛⲟⲩⲧⲉ ⲉϥⲙⲟⲟⲩⲧ’ ⲁⲩⲱ ⲁϥⲱⲛϩ <text:line-break/><text:span text:style-name="T1"> </text:span><text:span text:style-name="T2">(55/6) </text:span> §ϩⲁ ⲧⲉϩⲏ ⲉⲙ’ⲡⲁⲧⲉ ⲡⲉⲭ̅ⲥ̅ ⲉⲓ ⲛⲉ ⲙⲛ̅ ⲟⲉⲓⲕ’ <text:line-break/><text:span text:style-name="T1"> </text:span><text:span text:style-name="T2">(55/7) </text:span> ϩⲙ̅ ⲡⲕⲟⲥⲙⲟⲥ ⲛ̅ⲑⲉ ⲙ̅ⲡⲡⲁⲣⲁⲇⲓⲥⲟⲥ ⲡⲙⲁ <text:line-break/><text:span text:style-name="T1"> </text:span><text:span text:style-name="T2">(55/8) </text:span> ⲛⲉⲣⲉ ⲁⲇⲁⲙ ⲙ̅ⲙⲁⲩ ⲛⲉⲩⲛ̅ⲧⲁϥ ϩⲁϩ ⲛ̅ϣⲏⲛ <text:line-break/><text:span text:style-name="T1"> </text:span><text:span text:style-name="T2">(55/9) </text:span> ⲛ̅ⲛ̅ⲧⲣⲟⲫⲏ ⲛ̅ⲛ̅ⲑⲏⲣⲓⲟⲛ ⲛⲉ ⲙⲛ̅ⲧⲁϥ ⲥⲟⲩⲟ <text:line-break/><text:span text:style-name="T1"> </text:span><text:span text:style-name="T2">(55/10) </text:span> ⲛ̅ⲧⲧⲣⲟⲫⲏ ⲙ̅ⲡⲣⲱⲙⲉ ⲛⲉⲣⲉ ⲡⲣⲱⲙⲉ ⲥⲟ‐ <text:line-break/><text:span text:style-name="T1"> </text:span><text:span text:style-name="T2">(55/11) </text:span> ⲉⲓϣ ⲛ̅ⲑⲉ ⲛ̅ⲛ̅ⲑⲏⲣⲓⲟⲛ’ ⲁⲗⲗⲁ ⲛ̅ⲧⲁⲣⲉ ⲡⲉⲭⲥ̅ <text:line-break/><text:span text:style-name="T1"> </text:span><text:span text:style-name="T2">(55/12) </text:span> ⲉⲓ’ ⲡⲧⲉⲗⲓⲟⲥ ⲣ̅ⲣⲱⲙⲉ ⲁϥⲉⲓⲛⲉ ⲛ̅ⲟⲩⲟⲉⲓⲕ’ <text:line-break/><text:span text:style-name="T1"> </text:span><text:span text:style-name="T2">(55/13) </text:span> ⲉⲃⲟⲗ ϩⲛ̅ ⲧⲡⲉ ϣⲓⲛⲁ ⲉⲣⲉ ⲡⲣⲱⲙⲉ ⲛⲁⲣ̅ⲧⲣⲉ‐ <text:line-break/><text:span text:style-name="T1"> </text:span><text:span text:style-name="T2">(55/14) </text:span> ⲫⲉⲥⲑⲁⲓ ϩⲛ̅ ⲧⲧⲣⲟⲫⲏ ⲙ̅ⲡⲣⲱⲙⲉ ⲛⲉⲣⲉ ⲛ̅‐ <text:line-break/><text:span text:style-name="T1"> </text:span><text:span text:style-name="T2">(55/15) </text:span> ⲁⲣⲭⲱⲛ’ ⲙⲉⲉⲩⲉ ϫⲉ ϩⲛ̅ ⲧⲟⲩϭⲟⲙ’ ⲙⲛ̅ ⲡⲟⲩ‐ <text:line-break/><text:span text:style-name="T1"> </text:span><text:span text:style-name="T2">(55/16) </text:span> ⲱϣ ⲉⲩⲉⲓⲣⲉ ⲛ̅ⲛⲉⲧⲟⲩⲉⲓⲣⲉ ⲙ̅ⲙⲟⲟⲩ ⲛⲉ‐ <text:line-break/><text:span text:style-name="T1"> </text:span><text:span text:style-name="T2">(55/17) </text:span> ⲣⲉ ⲡⲡⲛ̅ⲁ̅ ⲇⲉ ⲉⲧⲟⲩⲁⲁⲃ ϩⲛ̅ ⲟⲩⲡⲉⲑⲏⲡ’ <text:line-break/><text:span text:style-name="T1"> </text:span><text:span text:style-name="T2">(55/18) </text:span> ⲛⲉϥ’ⲉⲛⲉⲣⲅⲉⲓ ⲙ̅ⲡⲧⲏⲣϥ ⲉⲃⲟⲗ ϩⲓⲧⲟⲟⲧⲟⲩ <text:line-break/><text:span text:style-name="T1"> </text:span><text:span text:style-name="T2">(55/19) </text:span> ⲛ̅ⲑⲉ ⲉⲧϥ’ⲟⲩⲱϣ’ ⲧⲁⲗⲏⲑⲉⲓⲁ ⲥⲉⲥⲓⲧⲉ ⲙ̅ⲙⲟⲥ <text:line-break/><text:span text:style-name="T1"> </text:span><text:span text:style-name="T2">(55/20) </text:span> ⲙ̅ⲙⲁ ⲛⲓⲙ ⲧⲉⲧϣⲟⲟⲡ’ ϫⲓⲛ ⲛ̅ϣⲟⲣⲡ ⲁⲩ‐ <text:line-break/><text:span text:style-name="T1"> </text:span><text:span text:style-name="T2">(55/21) </text:span> ⲱ ⲟⲩⲛ ϩⲁϩ ⲛⲁⲩ ⲉⲣⲟⲥ ⲉⲩⲥⲓⲧⲉ ⲙ̅ⲙⲟⲥ ϩⲛ̅‐ <text:line-break/><text:span text:style-name="T1"> </text:span><text:span text:style-name="T2">(55/22) </text:span> ⲕⲟⲩⲉⲓ ⲇⲉ † ⲉⲧⲟⲩⲛⲁⲩ ⲉⲣⲟⲥ ⲉⲩⲱⲥϩ ⲙ̅ⲙⲟⲥ <text:line-break/><text:span text:style-name="T1"> </text:span><text:span text:style-name="T2">(55/23) </text:span> §ⲡⲉϫⲉ ϩⲟⲉⲓⲛⲉ ϫⲉ ⲁⲙⲁⲣⲓⲁ ⲱ͂ ⲉⲃⲟⲗ ϩⲙ̅ <text:line-break/><text:span text:style-name="T1"> </text:span><text:span text:style-name="T2">(55/24) </text:span> ⲡⲡⲛ̅ⲁ̅ ⲉⲧⲟⲩⲁⲁⲃ’ ⲥⲉⲣ̅ⲡⲗⲁⲛⲁⲥⲑⲉ ⲟⲩ ⲡⲉ‐ <text:line-break/><text:span text:style-name="T1"> </text:span><text:span text:style-name="T2">(55/25) </text:span> ⲧⲟⲩϫⲱ ⲙ̅ⲙⲟϥ ⲥⲉⲥⲟⲟⲩⲛ ⲁⲛ ⲁϣ ⲛ̅ϩⲟ‐ <text:line-break/><text:span text:style-name="T1"> </text:span><text:span text:style-name="T2">(55/26) </text:span> ⲟⲩ ⲉⲛⲉϩ ⲡⲉⲛⲧⲁ ⲥϩⲓⲙⲉ ⲱ͂ ⲉⲃⲟⲗ’ ϩⲛ̅ ⲥϩⲓ‐ <text:line-break/><text:span text:style-name="T1"> </text:span><text:span text:style-name="T2">(55/27) </text:span> ⲙⲉ ⲙⲁⲣⲓⲁ ⲧⲉ ⲧⲡⲁⲣⲑⲉⲛⲟⲥ ⲉⲧⲉ ⲙ̅ⲡⲉ <text:line-break/><text:soft-page-break/><text:span text:style-name="T1"> </text:span><text:span text:style-name="T2">(55/28) </text:span> ⲇⲩⲛⲁⲙⲓⲥ ϫⲁϩⲙⲉⲥ ⲉⲥϣⲟⲟⲡ’ ⲛ̅ⲛⲟⲩ‐ <text:line-break/><text:span text:style-name="T1"> </text:span><text:span text:style-name="T2">(55/29) </text:span> ⲛⲟϭ ⲛ̅ⲛⲁⲛⲟϣ ⲛ̅ⲛ̅ϩⲉⲃⲣⲁⲓⲟⲥ ⲉⲧⲉ ⲛⲁ‐ <text:line-break/><text:span text:style-name="T1"> </text:span><text:span text:style-name="T2">(55/30) </text:span> ⲡⲟⲥⲧⲟⲗⲟⲥ ⲛⲉ ⲁⲩⲱ [ⲛ̅]ⲁⲡⲟⲥⲧⲟⲗⲓⲕⲟⲥ <text:line-break/><text:span text:style-name="T1"> </text:span><text:span text:style-name="T2">(55/31) </text:span> ⲧⲉⲉⲓⲡⲁⲣⲑⲉⲛⲟⲥ ⲉⲧ[ⲉ] ⲙ̅ⲡⲉ ⲇⲩⲛⲁⲙⲓⲥ <text:line-break/><text:span text:style-name="T1"> </text:span><text:span text:style-name="T2">(55/32) </text:span> ϫⲟϩⲙⲉⲥ ⲟⲩ[......ⲁ]ⲛⲇⲩⲛⲁⲙⲓⲥ <text:line-break/><text:span text:style-name="T1"> </text:span><text:span text:style-name="T2">(55/33) </text:span> ϫⲟϩⲙⲟⲩ ⲁⲩⲱ ⲛ̣[ⲉϥⲛⲁϫ]ⲟ̣ⲟⲥ ⲁⲛ ⲛ̅ϭⲓ <text:line-break/><text:span text:style-name="T1"> </text:span><text:span text:style-name="T2">(55/34) </text:span> ⲡϫⲟⲉⲓⲥ ϫⲉ ⲡⲁⲉ̣[ⲓⲱⲧ ⲉⲧϩ]ⲛ̣̅ ⲙ̅ⲡⲏⲩⲉ <text:line-break/><text:span text:style-name="T1"> </text:span><text:span text:style-name="T2">(55/35) </text:span> ⲉⲓ ⲙⲏⲧⲓ ϫⲉ ⲛⲉⲩⲛ̅ⲧ̅ⲁ[ϥ ⲙ̅ⲙⲁⲩ] ⲛ̣̅[ⲕ]ⲉⲉⲓⲱⲧ̣ <text:line-break/><text:span text:style-name="T1"> </text:span><text:span text:style-name="T2">(55/36) </text:span> ⲁⲗⲗⲁ ϩⲁⲡⲗⲱⲥ ⲁϥϫⲟⲟ̣[ⲥ ϫⲉ ⲡⲁⲉⲓⲱⲧ] <text:line-break/><text:span text:style-name="T1"> </text:span><text:span text:style-name="T2">(55/37) </text:span> §ⲡⲉϫⲉ ⲡϫⲟⲉⲓⲥ ⲛⲙ̅ⲙⲁⲑ̣[ⲏⲧⲏⲥ ϫⲉ....] <text:line-break/><text:span text:style-name="T1"> </text:span><text:span text:style-name="T2">(56/1) </text:span> [ⲉⲃ]ⲟ̣ⲗ̣ ϩ̣ⲛ̣̅ [ⲏ]ⲉⲓ ⲛⲓⲙ’̣ ⲉⲛⲓ ⲉϩⲟⲩⲛ’ ⲉⲡⲏⲉⲓ <text:line-break/><text:span text:style-name="T1"> </text:span><text:span text:style-name="T2">(56/2) </text:span> ⲙ̅ⲡⲉⲓⲱⲧ ⲙ̣̅ⲡⲣ̅ϫⲓⲟⲩ〈ⲉ〉 ⲇⲉ ⲛ̅ⲧⲟϥ’ ϩⲛ̅ ⲡⲏ‐ <text:line-break/><text:span text:style-name="T1"> </text:span><text:span text:style-name="T2">(56/3) </text:span> ⲉⲓ ⲙ̅ⲡⲉⲓⲱⲧ ⲛ̅ⲧⲉⲧⲛ̅ϥⲓ ⲉⲃⲟⲗ’ §ⲓⲥ̅ ⲟⲩⲣⲁⲛ <text:line-break/><text:span text:style-name="T1"> </text:span><text:span text:style-name="T2">(56/4) </text:span> ⲡⲉ ⲉϥϩⲏⲡ’ ⲡⲉⲭⲣ̅ⲥ̅ ⲟⲩⲣⲁⲛ ⲡⲉ ⲉϥⲟⲩⲟⲛϩ <text:line-break/><text:span text:style-name="T1"> </text:span><text:span text:style-name="T2">(56/5) </text:span> ⲉⲃⲟⲗ’ ⲇⲓⲁ ⲧⲟⲩⲧⲟ ⲓ̅ⲥ̅ ⲙⲉⲛ ϥϣⲟⲟⲡ ⲁⲛ <text:line-break/><text:span text:style-name="T1"> </text:span><text:span text:style-name="T2">(56/6) </text:span> ϩⲛ̅ ⲗⲁⲁⲩ ⲛ̅ⲛⲁⲥⲡⲉ ⲁⲗⲗⲁ ⲡⲉϥⲣⲁⲛ’ ⲡⲉ ⲓ̅ⲏ̅ⲥ <text:line-break/><text:span text:style-name="T1"> </text:span><text:span text:style-name="T2">(56/7) </text:span> ⲛ̅ⲑⲉ ⲉⲧⲟⲩⲙⲟⲩⲧⲉ ⲉⲣⲟϥ’ ⲙ̅ⲙⲟⲥ ⲡⲉⲭⲣ̅ⲥ̅ <text:line-break/><text:span text:style-name="T1"> </text:span><text:span text:style-name="T2">(56/8) </text:span> ⲇⲉ ⲡⲉϥ’ⲣⲁⲛ’ {ⲡⲉ} ⲙ̅ⲙ̅ⲛ̅ⲧ̅ⲥⲩⲣⲟⲥ ⲡⲉ ⲙⲉⲥ‐ <text:line-break/><text:span text:style-name="T1"> </text:span><text:span text:style-name="T2">(56/9) </text:span> ⲥⲓⲁⲥ ⲙ̅ⲙⲛ̅ⲧ̅ⲟⲩⲁⲉⲓⲁⲛⲓⲛ ⲇⲉ ⲡⲉ ⲡⲭ̅ⲥ̅ ⲡⲁⲛ‐ <text:line-break/><text:span text:style-name="T1"> </text:span><text:span text:style-name="T2">(56/10) </text:span> ⲧⲱⲥ ⲛ̅ⲕⲟⲟⲩⲉ ⲧⲏⲣⲟⲩ ⲟⲩⲛ̅ⲧⲁⲩϥ’ ⲙ̅ⲙⲁⲩ <text:line-break/><text:span text:style-name="T1"> </text:span><text:span text:style-name="T2">(56/11) </text:span> ⲕⲁⲧⲁ ⲧⲁⲥⲡⲉ ⲙ̅ⲡⲟⲩⲁ ⲡⲟⲩⲁ ⲛ̅ϩⲏⲧⲟⲩ’ <text:line-break/><text:span text:style-name="T1"> </text:span><text:span text:style-name="T2">(56/12) </text:span> ⲡⲛⲁⲍⲁⲣⲏⲛⲟⲥ ⲡⲉⲧⲟⲩⲟⲛϩ ⲉⲃⲟⲗ ⲡⲉ <text:line-break/><text:span text:style-name="T1"> </text:span><text:span text:style-name="T2">(56/13) </text:span> ⲙ̅ⲡⲡⲉⲑⲏⲡ’ ⲡⲉⲭ̅ⲥ̅ ⲟⲩⲛ̅ⲧⲁϥ’ ⲟⲩⲟⲛ ⲛⲓⲙ’ <text:line-break/><text:span text:style-name="T1"> </text:span><text:span text:style-name="T2">(56/14) </text:span> ϩⲣⲁⲓ̈ ⲛ̅ϩⲏⲧϥ’ ⲉⲓⲧⲉ ⲣⲱⲙⲉ ⲉⲓⲧⲉ ⲁⲅ’ⲅⲉⲗⲟⲥ <text:line-break/><text:span text:style-name="T1"> </text:span><text:span text:style-name="T2">(56/15) </text:span> ⲉⲓⲧⲉ ⲙⲩⲥⲧⲏⲣⲓⲟⲛ ⲁⲩⲱ ⲡⲉⲓⲱⲧ’ §ⲛⲉⲧϫⲱ <text:line-break/><text:span text:style-name="T1"> </text:span><text:span text:style-name="T2">(56/16) </text:span> ⲙ̅ⲙⲟⲥ ϫⲉ ⲁⲡϫⲟⲉⲓⲥ ⲙⲟⲩ’ ⲛ̅ϣⲟⲣⲡ’ ⲁⲩⲱ <text:line-break/><text:span text:style-name="T1"> </text:span><text:span text:style-name="T2">(56/17) </text:span> ⲁϥⲧⲱⲟⲩⲛ’ ⲥⲉⲣ̅ⲡⲗⲁⲛⲁ ⲁϥⲧⲱⲟⲩⲛ ⲅⲁⲣ’ <text:line-break/><text:span text:style-name="T1"> </text:span><text:span text:style-name="T2">(56/18) </text:span> ⲛ̅ϣⲟⲣⲡ’ ⲁⲩⲱ ⲁϥⲙⲟⲩ ⲉⲧⲙ̅ ⲟⲩⲁ ϫⲡⲉ <text:line-break/><text:span text:style-name="T1"> </text:span><text:span text:style-name="T2">(56/19) </text:span> ⲧⲁⲛⲁⲥⲧⲁⲥⲓⲥ ⲛ̅ϣⲟⲣⲡ’ ϥⲛⲁⲙⲟⲩ ⲁⲛ ϥⲟⲛϩ <text:line-break/><text:span text:style-name="T1"> </text:span><text:span text:style-name="T2">(56/20) </text:span> ⲛ̅ϭⲓ ⲡⲛⲟⲩⲧⲉ ⲛⲉⲣⲉ ⲡⲏ ⲛⲁⲙ〈‐‐‐〉 §ⲙⲗ̅ ⲗⲁ‐ <text:line-break/><text:span text:style-name="T1"> </text:span><text:span text:style-name="T2">(56/21) </text:span> ⲁⲩ ⲛⲁϩⲱⲡ’ ⲛ̅ⲛⲟⲩⲛⲟϭ ⲙ̅ⲡⲣⲁⲅⲙⲁ ⲉϥⲧⲁ‐ <text:line-break/><text:span text:style-name="T1"> </text:span><text:span text:style-name="T2">(56/22) </text:span> ⲉⲓⲏⲩ ϩⲛ̅ ⲟⲩⲛⲟϭ ⲛ̅ϩⲱⲃ ⲁⲗⲗⲁ ϩⲁϩ ⲛ̅ⲥⲟⲡ’ <text:line-break/><text:span text:style-name="T1"> </text:span><text:span text:style-name="T2">(56/23) </text:span> ⲁⲟⲩⲁ ϩⲛ̅ⲧⲃⲁ ⲉⲧⲉ ⲙⲛ̅ⲧⲟⲩ ⲏⲡⲉ ⲁϥⲛⲟϫⲟⲩ <text:line-break/><text:span text:style-name="T1"> </text:span><text:span text:style-name="T2">(56/24) </text:span> ⲁⲩϩⲱⲃ ϩⲁ ⲟⲩⲁⲥⲥⲁⲣⲓⲟⲛ ⲧⲁⲉⲓ ⲧⲉ ⲑⲉ ⲛ̅‐ <text:line-break/><text:span text:style-name="T1"> </text:span><text:span text:style-name="T2">(56/25) </text:span> ⲧⲯⲩⲭⲏ ⲟⲩϩⲱⲃ ⲉϥⲧⲁⲉⲓⲏⲩ ⲡⲉ ⲁⲥϣⲱ‐ <text:line-break/><text:span text:style-name="T1"> </text:span><text:span text:style-name="T2">(56/26) </text:span> ⲡⲉ ϩⲛ̅ⲛⲟⲩⲥⲱⲙⲁ ⲉϥϣⲏⲥ §ⲟⲩⲛ̅ ϩⲟⲉⲓⲛⲉ <text:line-break/><text:span text:style-name="T1"> </text:span><text:span text:style-name="T2">(56/27) </text:span> ⲣ̅ ϩⲟⲧⲉ ϫⲉ ⲙⲏⲡⲱⲥ ⲛ̅ⲥⲉⲧⲱⲟⲩⲛ ⲉⲩⲕⲁ‐ <text:line-break/><text:span text:style-name="T1"> </text:span><text:span text:style-name="T2">(56/28) </text:span> ⲕⲁϩⲏⲩ ⲉⲧⲃⲉ ⲡ[ⲁ]ⲉⲓ ⲥⲉⲟⲩⲱϣ ⲉⲧⲱⲟⲩⲛ <text:line-break/><text:span text:style-name="T1"> </text:span><text:span text:style-name="T2">(56/29) </text:span> ϩⲛ̅ ⲧⲥⲁⲣⲝ ⲁⲩⲱ̣ [ⲥ]ⲉ̣ⲥⲟⲟⲩⲛ ⲁⲛ ϫⲉ ⲛⲉⲧⲣ̅‐ <text:line-break/><text:span text:style-name="T1"> </text:span><text:span text:style-name="T2">(56/30) </text:span> ⲫⲟⲣⲉⲓ ⲛ̅ⲧⲥ[ⲁⲣⲝ ⲛ̅ⲧⲟ]ⲟ̣ⲩ ⲡⲉ ⲉⲧⲕⲏⲕⲁϩⲏⲩ <text:line-break/><text:span text:style-name="T1"> </text:span><text:span text:style-name="T2">(56/31) </text:span> ⲛⲁⲉⲓ ⲉⲧⲉ[......] ⲙ̅ⲙⲟⲟⲩ ⲉⲕⲁⲕⲟⲩ <text:line-break/><text:span text:style-name="T1"> </text:span><text:span text:style-name="T2">(56/32) </text:span> ⲉϩⲏ[ⲩ] ⲛ̣̅[ⲧⲟⲟⲩ ⲉⲧⲕ]ⲁⲕⲁϩⲏⲩ ⲁⲛ ⲙⲛ̅ ⲥⲁⲣⲝ’ <text:line-break/><text:span text:style-name="T1"> </text:span><text:span text:style-name="T2">(56/33) </text:span> [ϩⲓ ⲥⲛⲟϥ ⲛⲁ]ⲣ̣̅ⲕⲗⲏⲣⲟⲛⲟⲙⲉⲓ ⲛ̅ⲧⲙⲛ̅ⲧⲉ‐ <text:line-break/><text:span text:style-name="T1"> </text:span><text:span text:style-name="T2">(56/34) </text:span> [ⲣⲟ ⲙ̅ⲡⲛⲟ]ⲩ̣ⲧⲉ ⲛⲓⲙ’ ⲧⲉ ⲧⲁⲉⲓ’ ⲉⲧⲛⲁⲕⲗⲏ‐ <text:line-break/><text:span text:style-name="T1"> </text:span><text:span text:style-name="T2">(57/1) </text:span> ⲣⲟⲛⲟⲙⲉⲓ ⲁⲛ’ ⲧⲁⲉⲓ ⲉⲧϩⲓⲱⲱⲛ ⲛⲓⲙ ⲇⲉ ⲧⲉ̣ <text:line-break/><text:span text:style-name="T1"> </text:span><text:span text:style-name="T2">(57/2) </text:span> ⲧⲁⲉⲓ ϩⲱⲱⲥ ⲉⲧⲛⲁⲕⲗⲏⲣⲟⲛⲟⲙⲉⲓ ⲧⲁ ⲓ̅ⲥ̅ <text:line-break/><text:span text:style-name="T1"> </text:span><text:span text:style-name="T2">(57/3) </text:span> ⲧⲉ ⲙⲛ̅ ⲡⲉϥ’ⲥⲛⲟϥ’ ⲇⲓⲁ ⲧⲟⲩⲧⲟ ⲡⲉϫⲁϥ ϫⲉ <text:line-break/><text:soft-page-break/><text:span text:style-name="T1"> </text:span><text:span text:style-name="T2">(57/4) </text:span> ⲡⲉⲧⲁⲟⲩⲱⲙ ⲁⲛ ⲛ̅ⲧⲁⲥⲁⲣⲝ ⲁⲩⲱ ⲛ̅ϥⲥⲱ ⲙ̅‐ <text:line-break/><text:span text:style-name="T1"> </text:span><text:span text:style-name="T2">(57/5) </text:span> ⲡⲁⲥⲛⲟϥ’ ⲙⲛ̅ⲧⲁϥ ⲱⲛϩ ϩⲣⲁⲓ̈ ⲛ̅ϩⲏⲧϥ̅ ⲁϣ <text:line-break/><text:span text:style-name="T1"> </text:span><text:span text:style-name="T2">(57/6) </text:span> ⲧⲉ’ ⲧⲉϥ’ⲥⲁⲣⲝ ⲡⲉ ⲡⲗⲟⲅⲟⲥ ⲁⲩⲱ ⲡⲉϥ’ⲥⲛⲟϥ’ <text:line-break/><text:span text:style-name="T1"> </text:span><text:span text:style-name="T2">(57/7) </text:span> ⲡⲉ ⲡⲡ̅ⲛ̅ⲁ̅ ⲉⲧⲟⲩⲁⲁⲃ ⲡⲉⲛⲧⲁϩϫⲓ ⲛⲁⲉⲓ ⲟⲩⲛ‐ <text:line-break/><text:span text:style-name="T1"> </text:span><text:span text:style-name="T2">(57/8) </text:span> ⲧⲉϥ’ ⲧⲣⲟⲫⲏ ⲁⲩⲱ ⲟⲩⲛ̅ⲧⲁϥ’ ⲥⲱ ϩⲓ ⲃ̅ⲥⲱ’ <text:line-break/><text:span text:style-name="T1"> </text:span><text:span text:style-name="T2">(57/9) </text:span> ⲁⲛⲟⲕ’ ϯϭⲛ̅ ⲁⲣⲓⲕⲉ ⲁⲛⲕⲟⲟⲩⲉ ⲉⲧϫⲱ ⲙ̅ⲙⲟⲥ <text:line-break/><text:span text:style-name="T1"> </text:span><text:span text:style-name="T2">(57/10) </text:span> ϫⲉ ⲥⲛⲁⲧⲱⲟⲩⲛ ⲁⲛ ⲉⲓⲧⲉ ⲛ̅ⲧⲟⲟⲩ ⲙ̅ⲡⲉⲥ‐ <text:line-break/><text:span text:style-name="T1"> </text:span><text:span text:style-name="T2">(57/11) </text:span> ⲛⲁⲩ ⲥⲉϣⲟⲟⲡ’ ϩⲛ̅ ⲟⲩϣⲧⲁ’ ⲕϫⲱ ⲙ̅ⲙⲟⲥ <text:line-break/><text:span text:style-name="T1"> </text:span><text:span text:style-name="T2">(57/12) </text:span> ϫⲉ ⲧⲥⲁⲣⲝ’ ⲛⲁⲧⲱⲟⲩⲛ ⲁⲛ ⲁⲗⲗⲁ ϫⲟⲟⲥ ⲉⲣⲟ‐ <text:line-break/><text:span text:style-name="T1"> </text:span><text:span text:style-name="T2">(57/13) </text:span> ⲉⲓ ϫⲉ ⲁϣ ⲡⲉⲧⲛⲁⲧⲱⲟⲩⲛ ϣⲓⲛⲁ ⲉⲛⲁⲧⲁ‐ <text:line-break/><text:span text:style-name="T1"> </text:span><text:span text:style-name="T2">(57/14) </text:span> ⲉⲓⲟⲕ’ ⲕϫⲱ ⲙ̅ⲙⲟⲥ ϫⲉ ⲡⲡⲛ̅ⲁ̅ ϩⲛ̅ ⲧⲥⲁⲣⲝ <text:line-break/><text:span text:style-name="T1"> </text:span><text:span text:style-name="T2">(57/15) </text:span> ⲁⲩⲱ ⲡⲉⲉⲓⲕⲉⲟⲩⲟⲉⲓⲛ ⲡⲉ ϩⲛ̅ ⲧⲥⲁⲣⲝ ⲟⲩⲗⲟ‐ <text:line-break/><text:span text:style-name="T1"> </text:span><text:span text:style-name="T2">(57/16) </text:span> ⲅⲟⲥ ⲡⲉ ⲡⲉⲉⲓⲕⲉ ⲉϥϩⲛ̅ ⲧⲥⲁⲣⲝ ϫⲉ † ⲡⲉⲧⲕⲛⲁ‐ <text:line-break/><text:span text:style-name="T1"> </text:span><text:span text:style-name="T2">(57/17) </text:span> ϫⲟⲟⲥ ⲉⲕϫⲉ ⲗⲁⲁⲩ ⲁⲛ ⲙ̅ⲡⲃⲟⲗ ⲛ̅ⲧⲥⲁⲣⲝ <text:line-break/><text:span text:style-name="T1"> </text:span><text:span text:style-name="T2">(57/18) </text:span> ϩⲁⲡⲥ̅ ⲡⲉ ⲉⲧⲱⲟⲩⲛ ϩⲛ̅ ⲧⲉⲉⲓⲥⲁⲣⲝ’ ⲉϩⲱⲃ <text:line-break/><text:span text:style-name="T1"> </text:span><text:span text:style-name="T2">(57/19) </text:span> ⲛⲓⲙ’ ϣⲟⲟⲡ’ ⲛ̅ϩⲏⲧⲥ̅ ϩⲙ̅ ⲡⲉⲉⲓⲕⲟⲥⲙⲟⲥ <text:line-break/><text:span text:style-name="T1"> </text:span><text:span text:style-name="T2">(57/20) </text:span> ⲛⲉⲧϯ ϩⲓⲱⲟⲩ ⲛ̅ⲛ̅ϩⲃⲥⲱ ⲥⲉⲥⲟⲧⲡ’ ⲁⲛⲛ̅‐ <text:line-break/><text:span text:style-name="T1"> </text:span><text:span text:style-name="T2">(57/21) </text:span> ϩ̅ⲃ̅ⲥⲱ ϩⲛ̅ ⲧⲙⲛ̅ⲧⲉⲣⲟ ⲛⲙ̅ⲡⲏⲩⲉ ⲛ̅ϩ̅ⲃ̅ⲥⲱ <text:line-break/><text:span text:style-name="T1"> </text:span><text:span text:style-name="T2">(57/22) </text:span> ⲥⲉⲥⲟⲧⲡ’ ⲁⲛⲉⲛⲧⲁⲩⲧⲁⲁⲩ ϩⲓⲱⲟⲩ §ϩⲓⲧⲛ̅ <text:line-break/><text:span text:style-name="T1"> </text:span><text:span text:style-name="T2">(57/23) </text:span> ⲟⲩⲙⲟⲟⲩ ⲙⲛ̅ ⲟⲩⲕⲱϩⲧ’ ⲉⲩⲧⲟⲩⲃⲟ ⲙ̅ⲡⲙⲁ <text:line-break/><text:span text:style-name="T1"> </text:span><text:span text:style-name="T2">(57/24) </text:span> ⲧⲏⲣϥ’ ⲛⲉⲧⲟⲩⲟⲛϩ ϩⲓⲧⲛ̅ ⲛⲉⲧⲟⲩⲟⲛϩ ⲉ‐ <text:line-break/><text:span text:style-name="T1"> </text:span><text:span text:style-name="T2">(57/25) </text:span> ⲃⲟⲗ ⲛⲉⲑⲏⲡ’ ϩⲓⲧⲛ̅ ⲛⲉⲑⲏⲡ’ ⲟⲩⲛ ϩⲟ‐ <text:line-break/><text:span text:style-name="T1"> </text:span><text:span text:style-name="T2">(57/26) </text:span> ⲉⲓⲛⲉ ⲉⲩϩⲏⲡ’ ϩⲓⲧⲛ̅ ⲛⲉⲧⲟⲩⲟⲛϩ ⲉⲃⲟⲗ <text:line-break/><text:span text:style-name="T1"> </text:span><text:span text:style-name="T2">(57/27) </text:span> ⲟⲩⲙ̅ⲙⲟⲟⲩ ϩⲛ̅ ⲟⲩⲙⲟⲟⲩ ⲟⲩⲛ̅ ⲕⲱϩⲧ’ <text:line-break/><text:span text:style-name="T1"> </text:span><text:span text:style-name="T2">(57/28) </text:span> ϩⲛ̅ⲛⲟⲩⲭⲣⲓⲥⲙⲁ §ⲁⲓⲥ̅ ϥⲓⲧⲟⲩ ⲛ̅ϫⲓⲟⲩⲉ <text:line-break/><text:span text:style-name="T1"> </text:span><text:span text:style-name="T2">(57/29) </text:span> ⲧⲏⲣⲟⲩ ⲙ̅ⲡⲉϥ’ⲟ̣ⲩⲱⲛ̣[ϩ] ⲅⲁⲣ ⲉⲃⲟⲗ’ ⲛ̅ⲑⲉ <text:line-break/><text:span text:style-name="T1"> </text:span><text:span text:style-name="T2">(57/30) </text:span> ⲉⲛⲉϥϣⲟⲟⲡ’ [ⲛ̅ϩ]ⲏ̣[ⲧⲥ ⲁ]ⲗⲗⲁ ⲛ̅ⲧ’ⲁϥⲟⲩⲱⲛϩ <text:line-break/><text:span text:style-name="T1"> </text:span><text:span text:style-name="T2">(57/31) </text:span> ⲉⲃⲟⲗ ⲛ̅ⲑⲉ ⲉⲧ[ⲟⲩⲛⲁϣ]ϭ̣ⲙ̅ ϭⲟⲙ’ ⲛ̅ⲛⲁⲩ <text:line-break/><text:span text:style-name="T1"> </text:span><text:span text:style-name="T2">(57/32) </text:span> ⲉⲣⲟϥ’ ⲛ̅ϩⲏⲧⲥ̅ ⲛ[ⲁⲉⲓ ⲇⲉ ⲧⲏ]ⲣ̣ⲟⲩ ⲁϥⲟⲩ‐ <text:line-break/><text:span text:style-name="T1"> </text:span><text:span text:style-name="T2">(57/33) </text:span> ⲱⲛϩ ⲉⲃⲟⲗ ⲛⲁⲩ ⲁϥ̣[ⲟⲩⲱⲛϩ] ⲉ̣ⲃ̣ⲟⲗ ⲛ̅[ⲛ̅]‐ <text:line-break/><text:span text:style-name="T1"> </text:span><text:span text:style-name="T2">(57/34) </text:span> ⲛⲟϭ ϩⲱⲥ ⲛⲟϭ ⲁϥⲟⲩⲱ̣[ⲛϩ ⲉⲃⲟⲗ ⲛ̅]‐ <text:line-break/><text:span text:style-name="T1"> </text:span><text:span text:style-name="T2">(57/35) </text:span> ⲛ̅ⲕⲟⲩⲉⲓ ϩⲱⲥ ⲕⲟⲩⲉⲓ ⲁϥⲟ̣[ⲩⲱⲛϩ ⲉⲃⲟⲗ] <text:line-break/><text:span text:style-name="T1"> </text:span><text:span text:style-name="T2">(58/1) </text:span> [ⲛ̅ⲛ̅]ⲁⲅⲅⲉⲗ̣ⲟⲥ̣ ϩⲱⲥ ⲁⲅⲅⲉⲗⲟⲥ ⲁⲩⲱ <text:line-break/><text:span text:style-name="T1"> </text:span><text:span text:style-name="T2">(58/2) </text:span> ⲛ̅ⲣ̅ⲣⲱⲙⲉ ϩⲱⲥ ⲣⲱⲙⲉ ⲉⲧⲃⲉ ⲡⲁⲉⲓ ⲁⲡⲉϥ’‐ <text:line-break/><text:span text:style-name="T1"> </text:span><text:span text:style-name="T2">(58/3) </text:span> ⲗⲟⲅⲟⲥ ⲁϥϩⲟⲡϥ’ ⲉⲟⲩⲟⲛ ⲛⲓⲙ’ ϩⲟⲉⲓⲛⲉ <text:line-break/><text:span text:style-name="T1"> </text:span><text:span text:style-name="T2">(58/4) </text:span> ⲙⲉⲛ’ ⲁⲩⲛⲁⲩ ⲉⲣⲟϥ’ ⲉⲩⲙⲉⲉⲩⲉ ϫⲉ ⲛⲁⲩⲛⲁⲩ <text:line-break/><text:span text:style-name="T1"> </text:span><text:span text:style-name="T2">(58/5) </text:span> ⲉⲣⲟⲟⲩ ⲙ̅ⲙⲓⲛ ⲙ̅ⲙⲟⲟⲩ’ ⲁⲗⲗⲁ ⲛ̅ⲧⲁⲣⲉϥ’ⲟⲩ‐ <text:line-break/><text:span text:style-name="T1"> </text:span><text:span text:style-name="T2">(58/6) </text:span> ⲱⲛϩ’ ⲉⲃⲟⲗ’ ⲛ̅ⲛⲉϥ’ⲙⲁⲑⲏⲧⲏⲥ ϩⲛ̅ⲛⲟⲩⲉⲟ‐ <text:line-break/><text:span text:style-name="T1"> </text:span><text:span text:style-name="T2">(58/7) </text:span> ⲟⲩ ϩⲓϫⲙ̅ ⲡⲧⲟⲟⲩ ⲛⲉϥⲟ ⲁⲛ ⲛ̅ⲕⲟⲩⲉⲓ ⲁϥ’‐ <text:line-break/><text:span text:style-name="T1"> </text:span><text:span text:style-name="T2">(58/8) </text:span> ϣⲱⲡⲉ ⲛ̅ⲛⲟϭ ⲁⲗⲗⲁ ⲛ̅ⲧⲁϥⲣ̅ ⲙ̅ⲙⲁⲑⲏⲧⲏⲥ <text:line-break/><text:span text:style-name="T1"> </text:span><text:span text:style-name="T2">(58/9) </text:span> ⲛ̅ⲛⲟϭ ϫⲉⲕⲁⲁⲥ ⲉⲩⲛⲁϣϭⲙ̅ ϭⲟⲙ ⲛ̅ⲛⲁⲩ <text:line-break/><text:span text:style-name="T1"> </text:span><text:span text:style-name="T2">(58/10) </text:span> ⲉⲣⲟϥ’ ⲉϥⲟ ⲛ̅ⲛⲟϭ §ⲡⲉϫⲁϥ’ ⲙ̅ⲫⲟⲟⲩ ⲉⲧⲙ̅‐ <text:line-break/><text:span text:style-name="T1"> </text:span><text:span text:style-name="T2">(58/11) </text:span> ⲙⲁⲩ ϩⲛ̅ ⲧⲉⲩⲭⲁⲣⲓⲥⲧⲉⲓⲁ ϫⲉ ⲡⲉⲛⲧⲁϩϩⲱⲧ̅ⲣ̅ <text:line-break/><text:span text:style-name="T1"> </text:span><text:span text:style-name="T2">(58/12) </text:span> ⲙ̅ⲡⲧⲉⲗⲉⲓⲟⲥ † ⲡⲟⲩⲟⲉⲓⲛ’ ⲉⲡⲡⲛ̅ⲁ̅ ⲉⲧⲟⲩ‐ <text:line-break/><text:span text:style-name="T1"> </text:span><text:span text:style-name="T2">(58/13) </text:span> ⲁⲁⲃ’ ϩⲟⲧⲣ̅ ⲛ̅ⲁⲅ’ⲅⲉⲗⲟⲥ ⲉⲣⲟⲛ’ ϩⲱⲱⲛ ⲁ ⲛ‐ <text:line-break/><text:span text:style-name="T1"> </text:span><text:span text:style-name="T2">(58/14) </text:span> ϩⲓⲕⲱⲛ ⲙ̅ⲡⲣ̅ⲕⲁⲧⲁⲫⲣⲟⲛⲉⲓ’ ⲙ̅ⲡϩⲓⲉⲓⲃ%2 ⲁϫⲛ̅‐ <text:line-break/><text:span text:style-name="T1"> </text:span><text:span text:style-name="T2">(58/15) </text:span> ⲧϥ’ ⲅⲁⲣ’ ⲙⲛ̅ ϣϭⲟⲙ’ ⲉⲛⲁⲩ ⲉⲡ〈ⲣ̅〉ⲣⲟ’ ⲙⲛ̅ ⲗⲁⲁⲩ <text:line-break/><text:soft-page-break/><text:span text:style-name="T1"> </text:span><text:span text:style-name="T2">(58/16) </text:span> ⲛⲁϣϯ ⲡⲉϥ’ⲟⲩⲟⲉⲓ ⲉϩⲟⲩⲛ’ ⲉⲡⲣ̅ⲣⲟ ⲉϥ’‐ <text:line-break/><text:span text:style-name="T1"> </text:span><text:span text:style-name="T2">(58/17) </text:span> ⲕⲏⲕⲁϩⲏⲩ’ §ⲡⲣⲙ̅ⲙ̅ⲡⲉ ⲛⲁϣⲉ ⲛⲉϥ’ϣⲏⲣⲉ <text:line-break/><text:span text:style-name="T1"> </text:span><text:span text:style-name="T2">(58/18) </text:span> ⲛ̅ϩⲟⲩⲟ’ ⲁⲡⲣⲙ̅ⲛ̅ⲕⲁϩ ⲉϣϫⲉ ⲛ̅ϣⲏⲣⲉ ⲛ̅ⲁ‐ <text:line-break/><text:span text:style-name="T1"> </text:span><text:span text:style-name="T2">(58/19) </text:span> ⲇⲁⲙ’ ⲛⲁϣⲱⲟⲩ ⲕⲁⲓⲧⲟⲓⲅⲉ ϣⲁⲩⲙⲟⲩ ⲡⲟ‐ <text:line-break/><text:span text:style-name="T1"> </text:span><text:span text:style-name="T2">(58/20) </text:span> ⲥⲱ ⲙⲁⲗⲗⲟⲛ ⲛ̅ϣⲏⲣⲉ ⲙ̅ⲡⲧⲉⲗⲉⲓⲟⲥ ⲣ̅ⲣⲱ‐ <text:line-break/><text:span text:style-name="T1"> </text:span><text:span text:style-name="T2">(58/21) </text:span> ⲙⲉ ⲛⲁⲉⲓ ⲉⲙⲁⲩⲙⲟⲩ ⲁⲗⲗⲁ ⲥⲉϫⲡⲟ ⲙ̅ⲙⲟ‐ <text:line-break/><text:span text:style-name="T1"> </text:span><text:span text:style-name="T2">(58/22) </text:span> ⲟⲩ’ ⲟⲩⲟⲉⲓϣ ⲛⲓⲙ’ ⲡⲉⲓⲱⲧ’ ⲧⲁⲙⲉⲓⲟ ϣⲏ‐ <text:line-break/><text:span text:style-name="T1"> </text:span><text:span text:style-name="T2">(58/23) </text:span> ⲣⲉ ⲁⲩⲱ ⲡϣⲏⲣⲉ’ ⲙⲛ̅ ϭⲟⲙ ⲙ̅ⲙⲟϥ’ ⲛ̅ϥⲧⲁ‐ <text:line-break/><text:span text:style-name="T1"> </text:span><text:span text:style-name="T2">(58/24) </text:span> ⲙⲓⲉ ϣⲏⲣⲉ ⲡⲉⲛ’ⲧⲁⲩϫⲡⲟϥ ⲅⲁⲣ’ ⲙⲛ̅ ϭⲟⲙ’ <text:line-break/><text:span text:style-name="T1"> </text:span><text:span text:style-name="T2">(58/25) </text:span> ⲙ̅ⲙⲟϥ’ ⲛ̅ϥϫⲡⲟ ⲁⲗⲗⲁ ⲉⲡϣⲏⲣⲉ ϫⲡⲟ’ <text:line-break/><text:span text:style-name="T1"> </text:span><text:span text:style-name="T2">(58/26) </text:span> ⲛⲁϥ’ ⲛ̅ϩⲛ̅ⲥⲛⲏⲩ ⲛ̅ϩⲛ̅ϣⲏⲣⲉ ⲁⲛ ⲛⲉⲧⲟⲩ‐ <text:line-break/><text:span text:style-name="T1"> </text:span><text:span text:style-name="T2">(58/27) </text:span> ϫⲡⲟ ⲙ̅ⲙⲟⲟⲩ ⲧⲏⲣⲟⲩ ϩⲙ̅ ⲡⲕⲟⲥⲙⲟⲥ <text:line-break/><text:span text:style-name="T1"> </text:span><text:span text:style-name="T2">(58/28) </text:span> ⲉⲩϫⲡⲟ ⲙ̅ⲙⲟⲟ̣[ⲩ] ⲉⲃⲟⲗ̣ ϩⲛ̅ ⲧⲫⲩⲥⲓⲥ ⲁⲩ‐ <text:line-break/><text:span text:style-name="T1"> </text:span><text:span text:style-name="T2">(58/29) </text:span> ⲱ ⲛ̅ⲕⲟⲟⲩⲉ ϩⲙ̣̅ [ⲡⲁⲉ]ⲓ̣ [ⲉⲧ]ⲟ̣ⲩϫⲡⲟ ⲙ̅ⲙⲟⲟⲩ <text:line-break/><text:span text:style-name="T1"> </text:span><text:span text:style-name="T2">(58/30) </text:span> ⲉⲃⲟⲗ’ ⲛ̅ϩⲏⲧϥ̣ [ⲉⲩⲥⲟⲉⲓ]ϣ’ ⲉⲃⲟⲗ’ ⲙ̅ⲙⲁⲩ <text:line-break/><text:span text:style-name="T1"> </text:span><text:span text:style-name="T2">(58/31) </text:span> ⲉⲡⲣⲱⲙⲉ ϫ̣[ⲓ ⲙ̅ⲡⲥⲟ]ⲉⲓϣ ⲉⲃⲟⲗ ϩⲙ̅ ⲡⲣ̅‐ <text:line-break/><text:span text:style-name="T1"> </text:span><text:span text:style-name="T2">(58/32) </text:span> [ⲣ]ⲏⲧ’ ⲉϩ̣ⲟ̣[ⲩⲛ ⲉⲡⲧⲟ]ⲡⲟⲥ ⲙ̅ⲡⲥⲁ ⲛⲧⲡⲉ <text:line-break/><text:span text:style-name="T1"> </text:span><text:span text:style-name="T2">(58/33) </text:span> [........] ⲙ̣̅ⲙⲟϥ’ ⲉⲃⲟⲗ ϩⲛ ⲧ’ⲧⲁⲡⲣⲟ <text:line-break/><text:span text:style-name="T1"> </text:span><text:span text:style-name="T2">(58/34) </text:span> [ⲁⲩⲱ ⲉⲛⲉ] ⲁ̣ⲡⲗⲟⲅⲟⲥ ⲉⲓ ⲉⲃⲟⲗ ⲙ̅ⲙⲁⲩ <text:line-break/><text:span text:style-name="T1"> </text:span><text:span text:style-name="T2">(59/1) </text:span> ⲛⲉϥⲛⲁⲥⲟⲉⲓϣ ⲉⲃⲟⲗ ϩⲛ̣̅ ⲧⲧⲁⲡⲣⲟ ⲁⲩ[ⲱ] <text:line-break/><text:span text:style-name="T1"> </text:span><text:span text:style-name="T2">(59/2) </text:span> ⲛⲉϥⲛⲁϣⲱⲡⲉ ⲛ̅ⲧⲉⲗⲉⲓⲟⲥ ⲛ̅ⲧⲉⲗⲉⲓⲟⲥ ⲅⲁⲣ <text:line-break/><text:span text:style-name="T1"> </text:span><text:span text:style-name="T2">(59/3) </text:span> ϩⲓⲧⲛ̅ ⲟⲩⲡⲉⲓ ⲉⲩⲱ͂ ⲁⲩⲱ ⲉⲩϫⲡⲟ ⲇⲓⲁ ⲧⲟⲩⲧⲟ <text:line-break/><text:span text:style-name="T1"> </text:span><text:span text:style-name="T2">(59/4) </text:span> ⲁⲛⲟⲛ’ ϩⲱⲱⲛ ⲧⲛ̅ϯ ⲡⲓ ⲉⲣⲛ̅ ⲛ̅ⲛ̅ⲛⲉⲣⲏⲩ <text:line-break/><text:span text:style-name="T1"> </text:span><text:span text:style-name="T2">(59/5) </text:span> ⲉⲛϫⲓ ⲙ̅ⲡⲱ͂ ⲉⲃⲟⲗ ϩⲛ̅ ⲧⲭⲁⲣⲓⲥ ⲉⲧϩⲛ̅ ⲛ̅‐ <text:line-break/><text:span text:style-name="T1"> </text:span><text:span text:style-name="T2">(59/6) </text:span> ⲛ̅ⲛⲉⲣⲏⲩ §ⲛⲉ ⲟⲩⲛ̅ ϣⲟⲙⲧⲉ ⲙⲟⲟϣⲉ ⲙⲛ̅ <text:line-break/><text:span text:style-name="T1"> </text:span><text:span text:style-name="T2">(59/7) </text:span> ⲡϫⲟⲉⲓⲥ ⲟⲩⲟⲉⲓϣ ⲛⲓⲙ’ ⲙⲁⲣⲓⲁ ⲧⲉϥⲙⲁⲁⲩ <text:line-break/><text:span text:style-name="T1"> </text:span><text:span text:style-name="T2">(59/8) </text:span> ⲁⲩⲱ ⲧⲉⲥⲥⲱⲛⲉ ⲁⲩⲱ ⲙⲁⲅⲇⲁⲗⲏⲛⲏ ⲧⲁ‐ <text:line-break/><text:span text:style-name="T1"> </text:span><text:span text:style-name="T2">(59/9) </text:span> ⲉⲓ ⲉⲧⲟⲩⲙⲟⲩⲧⲉ ⲉⲣⲟⲥ ϫⲉ ⲧⲉϥⲕⲟⲓⲛⲱⲛⲟⲥ <text:line-break/><text:span text:style-name="T1"> </text:span><text:span text:style-name="T2">(59/10) </text:span> ⲙⲁⲣⲓⲁ ⲅⲁⲣ’ ⲧⲉ ⲧⲉϥⲥⲱⲛⲉ ⲁⲩⲱ ⲧⲉϥ’ⲙⲁⲁⲩ <text:line-break/><text:span text:style-name="T1"> </text:span><text:span text:style-name="T2">(59/11) </text:span> ⲧⲉ ⲁⲩⲱ ⲧⲉϥϩⲱⲧⲣⲉ ⲧⲉ §ⲡⲉⲓⲱⲧ ⲙⲛ̅ ⲡϣⲏ‐ <text:line-break/><text:span text:style-name="T1"> </text:span><text:span text:style-name="T2">(59/12) </text:span> ⲣⲉ ⲛ̅ϩⲁⲡⲗⲟⲩⲛ ⲛⲉ ⲣ̅ⲣⲁⲛ ⲡⲡ̅ⲛ̅ⲁ̅ ⲉⲧⲟⲩⲁⲁⲃ <text:line-break/><text:span text:style-name="T1"> </text:span><text:span text:style-name="T2">(59/13) </text:span> ⲟⲩⲣⲁⲛ’ ⲡⲉ ⲛ̅ⲇⲓⲡⲗⲟⲩⲛ ⲥⲉϣⲟⲟⲡ ⲅⲁⲣ’ ⲙ̅‐ <text:line-break/><text:span text:style-name="T1"> </text:span><text:span text:style-name="T2">(59/14) </text:span> ⲙⲁ ⲛⲓⲙ’ ⲥⲉⲙ̅ⲡⲥⲁ ⲛⲧⲡⲉ ⲥⲉⲙ̅ⲡⲥⲁ ⲙⲡⲓ‐ <text:line-break/><text:span text:style-name="T1"> </text:span><text:span text:style-name="T2">(59/15) </text:span> ⲧⲛ̅ ⲥⲉϩⲛ̅ ⲡⲉⲑⲏⲡ’ ⲥⲉϩⲛ̅ ⲛⲉⲧⲟⲩⲟⲛϩ <text:line-break/><text:span text:style-name="T1"> </text:span><text:span text:style-name="T2">(59/16) </text:span> ⲉⲃⲟⲗ ⲡⲡⲛ̅ⲁ̅ ⲉⲧⲟⲩⲁⲁⲃ’ ϥϩⲙ̅ ⲡⲟⲩⲱⲛϩ <text:line-break/><text:span text:style-name="T1"> </text:span><text:span text:style-name="T2">(59/17) </text:span> ⲉⲃⲟⲗ’ ϥϩⲙ̅ ⲡⲥⲁ ⲙⲡⲓⲧⲛ̅ ϥϩⲙ̅ ⲡⲉⲑⲏⲡ’ <text:line-break/><text:span text:style-name="T1"> </text:span><text:span text:style-name="T2">(59/18) </text:span> ϥϩⲙ̅ ⲡⲥⲁ ⲛⲧⲡⲉ §ⲥⲉϣⲙ̅ϣⲉ ⲛ̅ⲛⲉⲧⲟⲩ‐ <text:line-break/><text:span text:style-name="T1"> </text:span><text:span text:style-name="T2">(59/19) </text:span> ⲁⲁⲃ’ ϩⲓⲧⲛ̅ ⲛ̅ⲇⲩⲛⲁⲙⲓⲥ ⲙ̅ⲡⲟⲛⲏⲣⲟⲛ’ <text:line-break/><text:span text:style-name="T1"> </text:span><text:span text:style-name="T2">(59/20) </text:span> ⲥⲉⲟ ⲅⲁⲣ ⲛ̅ⲃⲗ̅ⲗⲉ ϩⲓⲧⲙ̅ ⲡ̅ⲛ̅ⲁ̅ ⲉⲧⲟⲩⲁⲁⲃ’ <text:line-break/><text:span text:style-name="T1"> </text:span><text:span text:style-name="T2">(59/21) </text:span> ϫⲉⲕⲁⲁⲥ ⲉⲩⲛⲁⲙⲉⲉⲩⲉ ϫⲉ ⲉⲩⲣ̅ϩⲩⲡⲏⲣⲉ‐ <text:line-break/><text:span text:style-name="T1"> </text:span><text:span text:style-name="T2">(59/22) </text:span> ⲧⲉⲓ ⲛ̅ⲛⲟⲩⲣⲱⲙⲉ ϩⲟⲡⲟⲧⲉ ⲉⲩⲉⲓⲣⲉ ⲛ̅ⲛⲉ‐ <text:line-break/><text:span text:style-name="T1"> </text:span><text:span text:style-name="T2">(59/23) </text:span> ⲧⲟⲩⲁⲁⲃ’ ⲉⲧⲃⲉ ⲡⲁⲉⲓ ⲁⲩ⟦ⲙ̅⟧ⲙⲁⲑⲏⲧⲏⲥ ⲣ̅‐ <text:line-break/><text:span text:style-name="T1"> </text:span><text:span text:style-name="T2">(59/24) </text:span> ⲁⲓⲧⲉⲓ ⲙ̅ⲡϫⲟⲉⲓⲥ ⲛ̅ⲛⲟⲩϩⲟⲟⲩ ⲉⲧⲃⲉ ⲟⲩ‐ <text:line-break/><text:span text:style-name="T1"> </text:span><text:span text:style-name="T2">(59/25) </text:span> ϩⲱⲃ ⲛ̅ⲧⲉ ⲡⲕⲟⲥⲙⲟⲥ ⲡⲉϫⲁϥ ⲛⲁϥ’ ϫⲉ <text:line-break/><text:span text:style-name="T1"> </text:span><text:span text:style-name="T2">(59/26) </text:span> ⲉⲣⲓⲁⲓⲧⲉⲓ ⲛ̅ⲧⲉⲕⲙⲁⲁⲩ ⲁⲩⲱ ⲥⲛⲁϯ ⲛⲁⲕ <text:line-break/><text:span text:style-name="T1"> </text:span><text:span text:style-name="T2">(59/27) </text:span> ⲉⲃⲟⲗ ϩⲛ̅ ⲁⲗⲗⲟⲧⲣⲓⲟⲛ §ⲡⲉϫⲉ ⲛⲁⲡⲟⲥⲧⲟ‐ <text:line-break/><text:span text:style-name="T1"> </text:span><text:span text:style-name="T2">(59/28) </text:span> ⲗⲟⲥ ⲛ̅ⲛ̅ⲙⲙⲁⲑⲏⲧⲏⲥ ϫⲉ ⲧⲙ̅ⲡⲣⲟⲥⲫⲟ‐ <text:line-break/><text:soft-page-break/><text:span text:style-name="T1"> </text:span><text:span text:style-name="T2">(59/29) </text:span> ⲣⲁ ⲧⲏⲣⲥ̅ ⲙⲁⲣⲉⲥϫⲡⲟ̣ [ⲛ]ⲁ̣ⲥ ⲛ̅ⲟⲩϩⲙⲟⲩ’ <text:line-break/><text:span text:style-name="T1"> </text:span><text:span text:style-name="T2">(59/30) </text:span> ⲛⲉⲩⲙⲟⲩⲧⲉ [ⲉⲧⲥⲟⲫⲓ]ⲁ ϫⲉ ϩⲙⲟⲩ ⲁϫⲛⲧ̅ⲥ̅ <text:line-break/><text:span text:style-name="T1"> </text:span><text:span text:style-name="T2">(59/31) </text:span> ⲙⲁⲣⲉ ⲡⲣⲟⲥⲫ[ⲟⲣⲁ ϣⲱ]ⲡⲉ ⲉϥϣⲏⲡ’ ⲧⲥⲟ‐ <text:line-break/><text:span text:style-name="T1"> </text:span><text:span text:style-name="T2">(59/32) </text:span> ⲫⲓⲁ ⲇⲉ ⲟⲩⲥⲧⲉⲓⲣ[ⲁ ⲧⲉ ⲁϫⲛ̅] ϣⲏⲣⲉ ⲇⲓⲁ ⲧⲟⲩ‐ <text:line-break/><text:span text:style-name="T1"> </text:span><text:span text:style-name="T2">(59/33) </text:span> ⲧⲟ ⲉⲩⲙⲟⲩⲧⲉ ⲉⲣⲟ[ⲥ ϫⲉ ⲡⲕⲉ]ⲥⲉⲡⲉⲓ ⲛ̅‐ <text:line-break/><text:span text:style-name="T1"> </text:span><text:span text:style-name="T2">(59/34) </text:span> ϩⲙⲟⲩ ⲡⲙⲁ ⲉⲧⲟⲩⲛⲁϣ̣[....]ⲛ̣̅ϣ̣ <text:line-break/><text:span text:style-name="T1"> </text:span><text:span text:style-name="T2">(59/35) </text:span> ⲛ̅ⲧⲟⲩϩⲉ ⲡⲡⲛ̅ⲁ̅ ⲉⲧⲟⲩⲁⲁⲃ̣ [......] <text:line-break/><text:span text:style-name="T1"> </text:span><text:span text:style-name="T2">(60/1) </text:span> [ⲁⲩ]ⲱ̣ ⲛⲁϣ[ⲉ] ⲛⲉⲥϣⲏ̣ⲣⲉ §ⲡⲉⲧⲉⲩⲛ̅ⲧⲁϥϥ’ <text:line-break/><text:span text:style-name="T1"> </text:span><text:span text:style-name="T2">(60/2) </text:span> ⲛ̅ϭⲓ ⲡⲉⲓⲱⲧ’ ⲛⲁ ⲡϣⲏⲣⲉ ⲛⲉ ⲁⲩⲱ ⲛ̅ⲧⲟϥ ϩⲱ‐ <text:line-break/><text:span text:style-name="T1"> </text:span><text:span text:style-name="T2">(60/3) </text:span> ⲱϥ’ ⲡϣⲏⲣⲉ ⲉⲛ ϩⲟⲥⲟⲛ ϥⲟ ⲛ̅ⲕⲟⲩⲉⲓ’ ⲙⲁⲩ‐ <text:line-break/><text:span text:style-name="T1"> </text:span><text:span text:style-name="T2">(60/4) </text:span> ⲡⲓⲥⲧⲉⲩⲉ ⲛⲁϥ’ ⲁⲛⲉⲧⲉ ⲛⲟⲩϥ’ ϩⲟⲧⲁⲛ ⲉϥ <text:line-break/><text:span text:style-name="T1"> </text:span><text:span text:style-name="T2">(60/5) </text:span> ϣⲁϣⲱⲡⲉ ⲣ̅ⲣⲱⲙⲉ ϣⲁⲣⲉ ⲡⲉϥⲉⲓⲱⲧ’ ϯ ⲛⲁϥ <text:line-break/><text:span text:style-name="T1"> </text:span><text:span text:style-name="T2">(60/6) </text:span> ⲛⲉⲧⲉⲩⲛ̅ⲧⲁⲃⲥⲉ ⲧⲏⲣⲟⲩ §ⲛⲉⲧⲥⲟⲣⲙ’ ⲛⲉⲧⲉ ⲡ’‐ <text:line-break/><text:span text:style-name="T1"> </text:span><text:span text:style-name="T2">(60/7) </text:span> ⲡⲛ̅ⲁ̅ ϫⲡⲟ ⲙ̅ⲙⲟⲟⲩ ϣⲁⲩⲥⲱⲣⲙ’ ⲟⲛ’ ⲉⲃⲟⲗ <text:line-break/><text:span text:style-name="T1"> </text:span><text:span text:style-name="T2">(60/8) </text:span> ϩⲓⲧⲟⲟⲧϥ’ ⲇⲓⲁ ⲧⲟⲩⲧⲟ ⲉⲃⲟⲗ’ ϩⲓⲧⲙ̅ ⲡⲓⲡⲛ̅ⲁ̅ <text:line-break/><text:span text:style-name="T1"> </text:span><text:span text:style-name="T2">(60/9) </text:span> ⲟⲩⲱⲧ’ ϥϫⲉⲣⲟ ⲛ̅ϭⲓ ⲡⲕⲱϩⲧ’ ⲁⲩⲱ ϥⲱϣⲙ̅ <text:line-break/><text:span text:style-name="T1"> </text:span><text:span text:style-name="T2">(60/10) </text:span> §ⲕⲉⲟⲩⲁ ⲡⲉ ⲉⲭ̅ⲁ̅ⲙ̅ⲱ̅ⲑ̅ ⲁⲩⲱ ⲕⲉⲟⲩⲁ ⲡⲉ’ <text:line-break/><text:span text:style-name="T1"> </text:span><text:span text:style-name="T2">(60/11) </text:span> ⲉⲭ̅ⲙ̅ⲱ̅ⲑ̅ ⲉⲭ̅ⲁⲙⲱⲑ̅ ⲧⲉ ⲧⲥⲟⲫⲓⲁ ϩⲁⲡⲗⲱⲥ <text:line-break/><text:span text:style-name="T1"> </text:span><text:span text:style-name="T2">(60/12) </text:span> ⲉⲭⲙⲱⲑ ⲇⲉ ⲧⲉ ⲧⲥⲟⲫⲓⲁ ⲙ̅ⲡⲙⲟⲩ ⲉⲧⲉ ⲧⲁ‐ <text:line-break/><text:span text:style-name="T1"> </text:span><text:span text:style-name="T2">(60/13) </text:span> ⲉⲓ ⲧⲉ {ⲧⲥⲟⲫⲓⲁ ⲙ̅ⲡⲙⲟⲩ ⲉⲧⲉ ⲧⲁⲉⲓ ⲧⲉ} ⲉⲧⲥⲟ‐ <text:line-break/><text:span text:style-name="T1"> </text:span><text:span text:style-name="T2">(60/14) </text:span> ⲟⲩⲛ ⲙ̅ⲡⲙⲟⲩ ⲧⲁⲉⲓ ⲉⲧⲟⲩⲙⲟⲩⲧⲉ ⲉⲣⲟⲥ ϫⲉ <text:line-break/><text:span text:style-name="T1"> </text:span><text:span text:style-name="T2">(60/15) </text:span> ⲧⲕⲟⲩⲉⲓ ⲛ̅ⲥⲟⲫⲓⲁ §ⲟⲩⲛ̅ ϩⲛ̅ⲑⲏⲣⲓⲟⲛ ϣⲟⲟⲡ’ <text:line-break/><text:span text:style-name="T1"> </text:span><text:span text:style-name="T2">(60/16) </text:span> ⲉⲩϩⲩⲡⲟⲧⲁⲥⲥⲉ ⲙ̅ⲡⲣⲱⲙⲉ ⲛ̅ⲑⲉ ⲙ̅ⲡⲙⲁⲥⲉ <text:line-break/><text:span text:style-name="T1"> </text:span><text:span text:style-name="T2">(60/17) </text:span> ⲙⲛ̅ ⲡⲉⲓⲱ ⲙⲛ̅ ϩⲛ̅ⲕⲟⲟⲩⲉ ⲛ̅ⲧⲉⲉⲓⲙⲓⲛⲉ ⲟⲩ‐ <text:line-break/><text:span text:style-name="T1"> </text:span><text:span text:style-name="T2">(60/18) </text:span> ⲛ̅ ϩⲛ̅ⲕⲟⲟⲩⲉ ϣⲟⲟⲡ’ ⲉⲩϩⲩⲡⲟⲧⲁⲥⲥⲉ ⲁⲛ’ <text:line-break/><text:span text:style-name="T1"> </text:span><text:span text:style-name="T2">(60/19) </text:span> ⲉⲩⲟⲩⲁⲧ’ ϩⲛ̅ ⲛⲉⲣⲏⲙⲓⲁ’ ⲡⲣⲱⲙⲉ ⲥⲕⲁⲉⲓ ⲛ̅‐ <text:line-break/><text:span text:style-name="T1"> </text:span><text:span text:style-name="T2">(60/20) </text:span> ⲧⲥⲱϣⲉ ϩⲓⲧⲛ̅ ⲛ̅ⲑⲏⲣⲓⲟⲛ ⲉⲧϩⲩⲡⲟⲧⲁⲥⲥⲉ <text:line-break/><text:span text:style-name="T1"> </text:span><text:span text:style-name="T2">(60/21) </text:span> ⲁⲩⲱ ⲉⲃⲟⲗ ϩⲙ̅ ⲡⲁⲉⲓ ϥⲥⲟⲉⲓϣ’ ⲛ̅ⲧⲟϥ’ ⲙⲛ̅ ⲛ̅‐ <text:line-break/><text:span text:style-name="T1"> </text:span><text:span text:style-name="T2">(60/22) </text:span> ⲑⲏⲣⲓⲟⲛ ⲉⲓⲧⲉ ⲛⲉⲧ’ϩⲩⲡⲟⲧⲁⲥⲥⲉ ⲉⲓⲧⲉ ⲛⲉⲧ’‐ <text:line-break/><text:span text:style-name="T1"> </text:span><text:span text:style-name="T2">(60/23) </text:span> ϩⲩⲡⲟⲧⲁⲥⲥⲉ ⲁⲛ ⲧⲁⲉⲓ ⲧⲉ ⲑⲉ ⲙ̅ⲡⲧⲉⲗⲓⲟⲥ <text:line-break/><text:span text:style-name="T1"> </text:span><text:span text:style-name="T2">(60/24) </text:span> ⲣ̅ⲣⲱⲙⲉ ϩⲓⲧⲛ̅ ϩⲛ̅ⲇⲩⲛⲁⲙⲓⲥ † ⲉⲧϩⲩⲡⲟⲧⲁⲥ’‐ <text:line-break/><text:span text:style-name="T1"> </text:span><text:span text:style-name="T2">(60/25) </text:span> ⲥⲉ ⲉϥⲥⲕⲁⲉⲓ ⲟⲩⲟⲛ’ ⲛⲓⲙ’ ⲉϥⲥⲟⲃⲧⲉ ⲉⲧⲣⲟⲩ‐ <text:line-break/><text:span text:style-name="T1"> </text:span><text:span text:style-name="T2">(60/26) </text:span> ϣⲱⲡⲉ ⲉⲧⲃⲉ ⲡⲁⲉⲓ ⲅⲁⲣ’ ⲉⲡⲙⲁ ⲧⲏⲣϥ’ ⲁϩⲉ‐ <text:line-break/><text:span text:style-name="T1"> </text:span><text:span text:style-name="T2">(60/27) </text:span> ⲣⲁⲧϥ’ ⲉⲓⲧⲉ ⲛⲉⲧⲛⲁⲛⲟⲩⲟⲩ’ ⲉⲓⲧⲉ ⲛⲉⲑⲟⲟⲩ <text:line-break/><text:span text:style-name="T1"> </text:span><text:span text:style-name="T2">(60/28) </text:span> ⲁⲩⲱ ⲛⲟⲩⲛⲁⲙ’ ⲙⲛ̅ ⲛ̅ϭⲃⲟⲩⲣ ⲡⲉⲡ̅ⲛ̅ⲁ̅ ⲉⲧⲟⲩ‐ <text:line-break/><text:span text:style-name="T1"> </text:span><text:span text:style-name="T2">(60/29) </text:span> ⲁⲁⲃ ϥⲙⲟⲟⲛⲉ ⲟ̣[ⲩⲟ]ⲛ ⲛⲓ̣ⲙ’ ⲁⲩⲱ ϥⲣ̅ⲁⲣⲭⲉⲓ <text:line-break/><text:span text:style-name="T1"> </text:span><text:span text:style-name="T2">(60/30) </text:span> ⲛ̅ⲛ̅ⲇⲩⲛⲁⲙⲓⲥ ⲧ[ⲏⲣⲟ]ⲩ̣ [ⲛ]ⲉ̣ⲧ’ϩⲩⲡⲟⲧⲁⲥⲥⲉ <text:line-break/><text:span text:style-name="T1"> </text:span><text:span text:style-name="T2">(60/31) </text:span> ⲁⲩⲱ ⲛⲉⲧ’ϩⲩⲡ[ⲟⲧⲁⲥⲥⲉ ⲁ]ⲛ ⲙⲛ̅ ⲛⲉⲧ’ⲟⲩⲁⲧ’ <text:line-break/><text:span text:style-name="T1"> </text:span><text:span text:style-name="T2">(60/32) </text:span> ⲕⲁⲓ ⲅⲁⲣ ϥϭⲱⲉ̣[....]ϣ̣ ⲱⲧⲡ’ ⲙ̅ⲙⲟⲟⲩ ⲉ‐ <text:line-break/><text:span text:style-name="T1"> </text:span><text:span text:style-name="T2">(60/33) </text:span> ϩ̣ⲟⲩⲛ’ ϫⲉ[ⲕⲁⲁⲥ ..]ϣⲁⲛ’ⲟⲩⲱϣ ⲛⲟⲩϣ‐ <text:line-break/><text:span text:style-name="T1"> </text:span><text:span text:style-name="T2">(60/34) </text:span> [ⲃ]ⲱ̣ⲕ̣ [ⲉⲃⲟⲗ] §[ⲡⲉⲛⲧ]ⲁ̣ⲩⲡⲗⲁⲥⲥⲉ ⲙ̅ⲙⲟϥ ⲛⲉ‐ <text:line-break/><text:span text:style-name="T1"> </text:span><text:span text:style-name="T2">(60/35) </text:span> [ⲥⲱϥ ⲁⲩⲱ ⲛ]ⲉⲕⲛⲁϩⲉ ⲁⲛⲉϥϣⲏⲣⲉ ⲉⲩⲟ’ <text:line-break/><text:span text:style-name="T1"> </text:span><text:span text:style-name="T2">(61/1) </text:span> ⲙ̅ⲡⲗⲁⲥⲙⲁ ⲛ̅ⲉⲩⲅⲉⲛⲏ̣ⲥ ⲉϣϫⲉ ⲙ̅ⲡⲟⲩⲣ̣̅‐ <text:line-break/><text:span text:style-name="T1"> </text:span><text:span text:style-name="T2">(61/2) </text:span> ⲡⲗⲁⲥⲥⲉ ⲙ̅ⲙⲟϥ’ ⲁⲗⲗⲁ ⲁⲩϫⲡⲟϥ’ ⲛⲉⲕ’ⲛⲁ‐ <text:line-break/><text:span text:style-name="T1"> </text:span><text:span text:style-name="T2">(61/3) </text:span> ϩⲉ ⲁⲡⲉϥ’ⲥⲡⲉⲣⲙⲁ ⲉϥⲟ ⲛ̅ⲉⲩⲅⲉⲛⲏⲥ ⲧⲉ‐ <text:line-break/><text:span text:style-name="T1"> </text:span><text:span text:style-name="T2">(61/4) </text:span> ⲛⲟⲩ ⲇⲉ ⲁⲩⲡⲗⲁⲥⲥⲉ ⲙ̅ⲙⲟϥ’ ⲁϥ’ϫⲡⲟ ⲁϣ <text:line-break/><text:span text:style-name="T1"> </text:span><text:span text:style-name="T2">(61/5) </text:span> ⲛ̅ⲉⲩⲅⲉⲛⲉⲓⲁ ⲡⲉ ⲡⲁⲉⲓ’ ϣⲟⲣⲡ’ ⲁⲧⲙ̅ⲛ̅ⲧ̅ⲛⲟ‐ <text:line-break/><text:soft-page-break/><text:span text:style-name="T1"> </text:span><text:span text:style-name="T2">(61/6) </text:span> ⲉⲓⲕ’ ϣⲱⲡⲉ ⲙ̅ⲙⲛ̅ⲛ̅ⲥⲱⲥ ⲫⲱⲧⲃⲉ ⲁⲩⲱ ⲁⲩ‐ <text:line-break/><text:span text:style-name="T1"> </text:span><text:span text:style-name="T2">(61/7) </text:span> ϫⲡⲟϥ’ ⲉⲃⲟⲗ’ ϩⲛ̅ ⲧⲙ̅ⲛ̅ⲧ̅ⲛⲟⲉⲓⲕ’ ⲛⲉ ⲡϣⲏ‐ <text:line-break/><text:span text:style-name="T1"> </text:span><text:span text:style-name="T2">(61/8) </text:span> ⲣⲉ ⲅⲁⲣ’ ⲙ̅ⲫⲟϥ’ ⲡⲉ ⲇⲓⲁ ⲧⲟⲩⲧⲟ ⲁϥϣⲱⲡⲉ <text:line-break/><text:span text:style-name="T1"> </text:span><text:span text:style-name="T2">(61/9) </text:span> ⲛ̅ϩⲁⲧⲃ̅ⲣⲱⲙⲉ ⲛ̅ⲑⲉ ⲙ̅ⲡⲉϥⲕⲉⲉⲓⲱⲧ’ ⲁⲩ‐ <text:line-break/><text:span text:style-name="T1"> </text:span><text:span text:style-name="T2">(61/10) </text:span> ⲱ ⲁϥⲙⲟⲩⲟⲩⲧ’ ⲙ̅ⲡⲉϥ’ⲥⲟⲛ ⲕⲟⲓⲛⲱⲛⲓⲁ ⲇⲉ <text:line-break/><text:span text:style-name="T1"> </text:span><text:span text:style-name="T2">(61/11) </text:span> ⲛⲓⲙ’ ⲛ̅ⲧⲁϩϣⲱⲡⲉ ⲉⲃⲟⲗ ϩⲛ̅ ⲛⲉϯⲛⲉ ⲁⲛ’ ⲛ̅‐ <text:line-break/><text:span text:style-name="T1"> </text:span><text:span text:style-name="T2">(61/12) </text:span> ⲛⲟⲩⲉⲣⲏⲩ ⲟⲩⲙ̅ⲛ̅ⲧ̅ⲛⲟⲉⲓⲕ’ ⲧⲉ’ §ⲡⲛⲟⲩⲧⲉ <text:line-break/><text:span text:style-name="T1"> </text:span><text:span text:style-name="T2">(61/13) </text:span> ⲟⲩϫϭⲓⲧ ⲡⲉ ⲛ̅ⲑⲉ ⲛ̅ⲛ̅ϫⲱϭⲉ ⲉⲧⲛⲁⲛⲟⲩⲟⲩ <text:line-break/><text:span text:style-name="T1"> </text:span><text:span text:style-name="T2">(61/14) </text:span> ϣⲁⲩⲙⲟⲩⲧⲉ ⲉⲣⲟⲟⲩ’ ϫⲉ ⲛⲁⲗⲏⲑⲓⲛⲟⲛ ϣⲁⲩ‐ <text:line-break/><text:span text:style-name="T1"> </text:span><text:span text:style-name="T2">(61/15) </text:span> ⲙⲟⲩ ⲙⲛ̅ ⲛⲉⲛ’ⲧⲁⲩϫⲱϭⲉ ϩⲣⲁⲓ̈ ⲛ̅ϩⲏⲧⲟⲩ ⲧⲁ’‐ <text:line-break/><text:span text:style-name="T1"> </text:span><text:span text:style-name="T2">(61/16) </text:span> ⲉⲓ ⲧⲉ ⲑⲉ ⲛ̅ⲛⲉⲛ’ⲧⲁ ⲡⲛⲟⲩⲧⲉ ϫⲟϭⲟⲩ’ ⲉ‐ <text:line-break/><text:span text:style-name="T1"> </text:span><text:span text:style-name="T2">(61/17) </text:span> ⲡⲉⲓⲇⲏ ϩⲛ̅ⲛⲁⲧ’ⲙⲟⲩ ⲛⲉ ⲛⲉϥϫⲱϭⲉ ϣⲁⲩ‐ <text:line-break/><text:span text:style-name="T1"> </text:span><text:span text:style-name="T2">(61/18) </text:span> ⲣ̅ ⲁⲧⲙⲟⲩ ⲉⲃⲟⲗ’ † ϩⲓⲧⲟⲟⲧϥ’ ⲛ̅ⲛⲉϥ’ⲡⲁϩⲣⲉ’ <text:line-break/><text:span text:style-name="T1"> </text:span><text:span text:style-name="T2">(61/19) </text:span> ⲡⲛⲟⲩⲧⲉ ⲇⲉ ⲣ̅ⲃⲁⲡⲧⲓⲍⲉ ⲛ̅ⲛⲉⲧϥⲣ̅ⲃⲁⲡⲧⲓ‐ <text:line-break/><text:span text:style-name="T1"> </text:span><text:span text:style-name="T2">(61/20) </text:span> ⲍⲉ ⲙ̅ⲙⲟⲟⲩ ϩⲛ̅ ⲟⲩⲙⲟⲟⲩ ⲙⲛ̅ ⟦ⲟⲩ⟧ ϭⲟⲙ’ <text:line-break/><text:span text:style-name="T1"> </text:span><text:span text:style-name="T2">(61/21) </text:span> ⲛ̅ⲧⲉ ⲗⲁⲁⲩ ⲛⲁⲩ’ ⲁⲗⲁⲁⲩ ϩⲛ̅ ⲛⲉⲧ’ⲥⲙⲟⲛⲧ’ <text:line-break/><text:span text:style-name="T1"> </text:span><text:span text:style-name="T2">(61/22) </text:span> ⲉⲓ ⲙⲏⲧⲓ ⲛ̅ⲧⲉ ⲡⲉⲧⲙ̅ⲙⲁⲩ ϣⲱⲡⲉ ⲛ̅ⲑⲉ <text:line-break/><text:span text:style-name="T1"> </text:span><text:span text:style-name="T2">(61/23) </text:span> ⲛ̅ⲛⲉⲧⲙ̅ⲙⲁⲩ ⲛ̅ⲑⲉ ⲙ̅ⲡⲣⲱⲙⲉ ⲁⲛ ⲉϥ‐ <text:line-break/><text:span text:style-name="T1"> </text:span><text:span text:style-name="T2">(61/24) </text:span> ϩⲙ̅ ⲡⲕⲟⲥⲙⲟⲥ ϥⲛⲁⲩ ⲉⲡⲣⲏ ⲉϥⲟ ⲣ̅ⲣⲏ <text:line-break/><text:span text:style-name="T1"> </text:span><text:span text:style-name="T2">(61/25) </text:span> ⲁⲛ ⲁⲩⲱ ϥⲛⲁⲩ ⲉⲧⲡⲉ ⲙⲛ̅ ⲡⲕⲁϩ ⲙ̅ⲛ̅ ⲛ̅‐ <text:line-break/><text:span text:style-name="T1"> </text:span><text:span text:style-name="T2">(61/26) </text:span> ⲕⲉϩⲃⲏⲩⲉ ⲧⲏⲣⲟⲩ ⲉⲛ’ⲧⲟϥ’ ⲁⲛ ⲡⲉ ⲛⲉⲧⲙ̅‐ <text:line-break/><text:span text:style-name="T1"> </text:span><text:span text:style-name="T2">(61/27) </text:span> ⲙⲁⲩ ⲧⲁⲉⲓ ⲧⲉ ⲑⲉ ϩⲣⲁⲓ̈ ϩⲛ̅ ⲧⲙⲉ ⲁⲗⲗⲁ ⲁⲕ’‐ <text:line-break/><text:span text:style-name="T1"> </text:span><text:span text:style-name="T2">(61/28) </text:span> ⲛⲁⲩ ⲉⲗⲁⲁⲩ’ ⲛ̅ⲧⲉ ⲡⲙⲁ ⲉⲧⲙ̅ⲙⲁⲩ ⲉⲕ’ϣⲱ‐ <text:line-break/><text:span text:style-name="T1"> </text:span><text:span text:style-name="T2">(61/29) </text:span> ⲡⲉ ⲛ̅ⲛⲉⲧⲙ̅ⲙⲁⲩ’ ⲁⲕⲛⲁⲩ ⲁⲡⲡ̅ⲛ̅ⲁ̅ ⲁⲕ’‐ <text:line-break/><text:span text:style-name="T1"> </text:span><text:span text:style-name="T2">(61/30) </text:span> ϣⲱⲡⲉ ⲙ̅ⲡⲛ̅ⲁ̅ ⲁⲕ̣ⲛⲁ̣[ⲩ ⲁ]ⲡⲭ̅ⲥ̅ ⲁⲕϣⲱⲡⲉ <text:line-break/><text:span text:style-name="T1"> </text:span><text:span text:style-name="T2">(61/31) </text:span> ⲛ̅ⲭⲥ̅ ⲁⲕⲛⲁⲩ ⲁⲡ̣[ⲉⲓⲱⲧ ⲕ]ⲛⲁϣⲱⲡⲉ ⲛ̅ⲉⲓ‐ <text:line-break/><text:span text:style-name="T1"> </text:span><text:span text:style-name="T2">(61/32) </text:span> ⲱⲧ’ ⲇⲓⲁ ⲧⲟⲩⲧⲟ [ⲛ̅ⲛⲉⲉⲓⲙⲁ] ⲙⲉⲛ ⲕⲛⲁⲩ <text:line-break/><text:span text:style-name="T1"> </text:span><text:span text:style-name="T2">(61/33) </text:span> ⲁϩⲱⲃ ⲛⲓⲙ’ ⲁⲩⲱ ⲕ̣[ⲛⲁⲩ ⲉⲣⲟ]ⲕ’ ⲁⲛ ⲟⲩⲁⲁⲕ’ <text:line-break/><text:span text:style-name="T1"> </text:span><text:span text:style-name="T2">(61/34) </text:span> ⲕⲛⲁⲩ ⲇⲉ ⲉⲣⲟⲕ’ ⲙ̅ⲡ̣[ⲙⲁ ⲉⲧⲙ̅]ⲙⲁⲩ ⲡⲉⲧ‐ <text:line-break/><text:span text:style-name="T1"> </text:span><text:span text:style-name="T2">(61/35) </text:span> ⲕⲛⲁⲩ ⲅⲁⲣ’ ⲉⲣⲟϥ’ ⲉⲕⲛⲁϣ[ⲱⲡⲉ ⲙ̅ⲙ]ⲟϥ̣ <text:line-break/><text:span text:style-name="T1"> </text:span><text:span text:style-name="T2">(61/36) </text:span> §ⲧⲡⲓⲥⲧⲓⲥ ϫⲓ ⲧⲁⲅⲁⲡⲏ’ ⲥϯ ⲙ[ⲛ̅ ⲗⲁⲁⲩ ⲛⲁϣ]‐ <text:line-break/><text:span text:style-name="T1"> </text:span><text:span text:style-name="T2">(62/1) </text:span> [ϫⲓ] ⲁ̣ϫⲛ̅ ⲧⲡⲓ̣ⲥⲧⲓⲥ [ⲙ]ⲛ̅ ⲗⲁⲁⲩ ⲛⲁϣϯ ⲁϫⲛ̅ <text:line-break/><text:span text:style-name="T1"> </text:span><text:span text:style-name="T2">(62/2) </text:span> ⲁⲅⲁⲡⲏ ⲉⲧⲃⲉ ⲡⲁⲉⲓ’ ϫⲉⲕⲁⲁⲥ ⲙⲉⲛ’ ⲉⲛⲁϫⲓ <text:line-break/><text:span text:style-name="T1"> </text:span><text:span text:style-name="T2">(62/3) </text:span> ⲧⲛ̅ⲣ̅ⲡⲓⲥⲧⲉⲩⲉ ϣⲓⲛⲁ ⲇ〈ⲉ〉 ⲉⲛⲁⲙⲉ ⲛ̅ⲧⲛ̅ϯ ⲉⲡⲉⲓ <text:line-break/><text:span text:style-name="T1"> </text:span><text:span text:style-name="T2">(62/4) </text:span> ⲉⲣϣⲁ ⲟⲩⲁ ϯ ϩⲛ̅ ⲟⲩⲁⲅⲁⲡⲏ ⲁⲛ ⲙⲛ̅ⲧⲉϥ ⲱ‐ <text:line-break/><text:span text:style-name="T1"> </text:span><text:span text:style-name="T2">(62/5) </text:span> ⲫⲉⲗⲉⲓⲁ ϩⲙ̅ ⲡⲉⲛⲧⲁϥⲧⲁⲁϥ’ ⲡⲉⲛⲧⲁϩϫⲓ <text:line-break/><text:span text:style-name="T1"> </text:span><text:span text:style-name="T2">(62/6) </text:span> ⲡϫⲟⲉⲓⲥ ⲁⲛ ⲟ ⲛⲛ̅ϩⲉⲃⲣⲁⲓⲟⲥ ⲉⲧⲓ §ⲛ̅ⲁⲡⲟ‐ <text:line-break/><text:span text:style-name="T1"> </text:span><text:span text:style-name="T2">(62/7) </text:span> ⲥⲧⲟⲗⲟⲥ ⲉⲧϩⲓ ⲧⲛ̅ⲛⲉϩⲏ ⲧⲉⲉⲓϩⲉ ⲛⲉⲩⲙⲟⲩⲧ‐ <text:line-break/><text:span text:style-name="T1"> </text:span><text:span text:style-name="T2">(62/8) </text:span> ⲧⲉ ϫⲉ ⲓⲏ̅ⲥ̅ ⲡⲛⲁⲍⲱⲣⲁⲓⲟⲥ ⲙⲉⲥⲥⲓⲁⲥ ⲉⲧⲉ <text:line-break/><text:span text:style-name="T1"> </text:span><text:span text:style-name="T2">(62/9) </text:span> ⲡⲁⲉⲓ ⲡⲉ ⲓ̅ⲏ̅ⲥ̅ ⲡⲛⲁⲍⲱⲣⲁⲓⲟⲥ ⲡⲉⲭ̅ⲥ̅’ ⲡϩⲁⲉ <text:line-break/><text:span text:style-name="T1"> </text:span><text:span text:style-name="T2">(62/10) </text:span> ⲣ̅ⲣⲁⲛ’ ⲡⲉ ⲡⲉⲭⲥ̅ ⲡϣⲟⲣⲡ’ ⲡⲉ ⲓ̅ⲥ̅ ⲡⲉⲧϩⲛ̅ <text:line-break/><text:span text:style-name="T1"> </text:span><text:span text:style-name="T2">(62/11) </text:span> ⲧⲙⲏⲧⲉ ⲡⲉ ⲡⲛⲁⲍⲁⲣⲏⲛⲟⲥ ⲙⲉⲥⲥⲓⲁⲥ’ <text:line-break/><text:span text:style-name="T1"> </text:span><text:span text:style-name="T2">(62/12) </text:span> ⲟⲩⲛ̅ⲧⲁϥ’ ⲥⲏⲙⲁⲥⲓⲁ ⲥⲛ̅ⲧⲉ ⲁⲩⲱ ⲡⲉⲭⲣ̅ⲥ̅ <text:line-break/><text:span text:style-name="T1"> </text:span><text:span text:style-name="T2">(62/13) </text:span> ⲁⲩⲱ ⲡⲉⲧϣⲏⲩ ⲓ̅ⲥ̅ ⲙ̅ⲙ̅ⲛⲧ̅ϩⲉⲃⲣⲁⲓⲟⲥ ⲡⲉ <text:line-break/><text:span text:style-name="T1"> </text:span><text:span text:style-name="T2">(62/14) </text:span> ⲡⲥⲱⲧⲉ ⲛⲁⲍⲁⲣⲁ ⲧⲉ ⲧⲁⲗⲏⲑⲉⲓⲁ ⲡⲛⲁ‐ <text:line-break/><text:span text:style-name="T1"> </text:span><text:span text:style-name="T2">(62/15) </text:span> ⲍⲁⲣⲏⲛⲟⲥ ⟦ⲛⲉ⟧ ϭⲉ ⲧⲉ ⲧⲁⲗⲏⲑⲉⲓⲁ † ⲡⲉ ⲡⲭ̅ⲥ̅ † <text:line-break/><text:span text:style-name="T1"> </text:span><text:span text:style-name="T2">(62/16) </text:span> ⲛ̅ⲧⲁⲩϣⲓⲧϥ’ ⲡⲛⲁⲍⲁⲣⲏⲛⲟⲥ ⲙⲛ̅ ⲓ̅ⲥ̅ <text:line-break/><text:soft-page-break/><text:span text:style-name="T1"> </text:span><text:span text:style-name="T2">(62/17) </text:span> ⲛⲉⲛⲧⲁⲩϣⲓⲧⲟⲩ §ⲡⲙⲁⲣⲅⲁⲣⲓⲧⲏⲥ ⲉⲩϣⲁⲛ‐ <text:line-break/><text:span text:style-name="T1"> </text:span><text:span text:style-name="T2">(62/18) </text:span> ⲛⲟϫϥ’ ⲉⲡⲓⲧⲛ̅ ⲉⲡⲃⲟⲣⲃⲟⲣⲟⲛ ϣⲁϥϣⲱ‐ <text:line-break/><text:span text:style-name="T1"> </text:span><text:span text:style-name="T2">(62/19) </text:span> ⲡⲉ {ϣⲁϥϣⲱⲡⲉ ⲁⲛ’} ⲉϥϣⲏⲥ ⲛ̅ϩⲟⲩⲟ <text:line-break/><text:span text:style-name="T1"> </text:span><text:span text:style-name="T2">(62/20) </text:span> ⲟⲩⲧⲉ ⲉⲩϣⲁⲧⲁϩⲥϥ’ ⲛ̅ⲛⲁⲡⲟⲃⲁⲣⲥⲓⲙⲟⲛ <text:line-break/><text:span text:style-name="T1"> </text:span><text:span text:style-name="T2">(62/21) </text:span> ⲉϥⲛⲁϣⲱⲡⲉ 〈ⲁⲛ〉 ⲉϥⲧⲁⲉⲓⲏⲩ’ ⲁⲗⲗⲁ ⲟⲩⲛ̅ⲧⲁϥ’ <text:line-break/><text:span text:style-name="T1"> </text:span><text:span text:style-name="T2">(62/22) </text:span> ⲙ̅ⲙⲁⲩ ⲙ̅ⲡⲧⲁⲉⲓⲟ ϩⲁϩⲧⲛ̅ ⲡⲉϥ’ϫⲟⲉⲓⲥ’ <text:line-break/><text:span text:style-name="T1"> </text:span><text:span text:style-name="T2">(62/23) </text:span> ⲟⲩⲟⲉⲓϣ ⲛⲓⲙ’ ⲧⲁⲉⲓ ⲧⲉ ⲑⲉ ⲛ̅ⲛ̅ϣⲏⲣⲉ ⲙ̅‐ <text:line-break/><text:span text:style-name="T1"> </text:span><text:span text:style-name="T2">(62/24) </text:span> ⲡⲛⲟⲩⲧⲉ ϩⲛ̅ ⲛⲉⲧⲟⲩⲛⲁϣⲱⲡⲉ ⲛ̅ϩⲏⲧⲟⲩ <text:line-break/><text:span text:style-name="T1"> </text:span><text:span text:style-name="T2">(62/25) </text:span> ⲉⲧⲓ ⲟⲩⲛ̅ⲧⲁⲩ ⲙ̅ⲙⲁⲩ ⲙ̅ⲡⲧⲁⲉⲓⲟ ϩⲁϩⲧⲙ̅ ⲡⲟⲩ‐ <text:line-break/><text:span text:style-name="T1"> </text:span><text:span text:style-name="T2">(62/26) </text:span> ⲉⲓⲱⲧ’ §ⲉⲕ’ϣⲁϫⲟⲟⲥ ϫⲉ ⲁⲛⲟⲕ’ ⲟⲩⲓ̈ⲟⲩⲇⲁⲓ̈ <text:line-break/><text:span text:style-name="T1"> </text:span><text:span text:style-name="T2">(62/27) </text:span> ⲙⲛ̅ ⲗⲁⲁⲩ ⲛⲁⲕⲓⲙ’ ⲉⲕϣⲁϫⲟⲟⲥ’ ϫⲉ ⲁⲛⲟⲕ’ ⲟⲩ‐ <text:line-break/><text:span text:style-name="T1"> </text:span><text:span text:style-name="T2">(62/28) </text:span> ϩⲣⲱⲙⲁⲓⲟⲥ ⲙⲛ̅ ⲗⲁⲁⲩ ⲛⲁⲣ̅ⲧⲁⲣⲁⲥⲥⲉ ⲉⲕϣⲁ‐ <text:line-break/><text:span text:style-name="T1"> </text:span><text:span text:style-name="T2">(62/29) </text:span> ϫⲟⲟⲥ ϫⲉ ⲁⲛⲟ[ⲕ ⲟ]ⲩϩⲉ̣ⲗ̣ⲗⲏⲛ ⲟⲩⲃⲁⲣⲃⲁ‐ <text:line-break/><text:span text:style-name="T1"> </text:span><text:span text:style-name="T2">(62/30) </text:span> ⲣ̣ⲟⲥ ⲟⲩϩⲙϩ̅ⲁ̅ⲗ̅ [ⲟⲩⲉⲗⲉⲩ]ⲑⲉⲣⲟⲥ ⲙⲛ̅ ⲗⲁⲁⲩ <text:line-break/><text:span text:style-name="T1"> </text:span><text:span text:style-name="T2">(62/31) </text:span> ⲛⲁϣⲧⲟⲣⲧⲣ̅ ⲉⲕ[ϣⲁϫⲟⲟⲥ] ϫⲉ ⲁⲛⲟⲕ’ ⲟⲩⲭⲣⲏ‐ <text:line-break/><text:span text:style-name="T1"> </text:span><text:span text:style-name="T2">(62/32) </text:span> ⲥ̣ⲧⲓⲁⲛⲟⲥ ⲡ[.....] ⲛⲁⲛⲟⲉⲓⲛ ⲛ̅ⲅⲉⲛⲟⲓ‐ <text:line-break/><text:span text:style-name="T1"> </text:span><text:span text:style-name="T2">(62/33) </text:span> ⲧⲟ̣ ⲛ̅ⲧⲁϣ̣[... ⲛ̅ⲧ]ⲉⲉⲓⲙⲉⲓⲛⲉ ⲡⲁⲉⲓ’ ⲉ‐ <text:line-break/><text:span text:style-name="T1"> </text:span><text:span text:style-name="T2">(62/34) </text:span> [ⲧ]ⲉ̣ .[.....] ⲛⲁϣϩⲩⲡⲟⲙⲉⲓⲛⲉ ⲁⲛ’ ⲉ‐ <text:line-break/><text:span text:style-name="T1"> </text:span><text:span text:style-name="T2">(62/35) </text:span> [ⲥⲱⲧⲙ̅ ⲉⲡ]ⲉ̣ϥⲣⲁⲛ’ §ⲡⲛⲟⲩⲧⲉ ⲟⲩⲁⲙⲣⲱ’ <text:line-break/><text:span text:style-name="T1"> </text:span><text:span text:style-name="T2">(63/1) </text:span> ⲙⲉ ⲡⲉ ⲇⲓⲁ ⲧⲟⲩⲧⲟ ⲥⲉ̣[ϣⲱ]ⲱⲧ̣ ⲙ̣̅ⲡⲣⲱⲙ̣[ⲉ] <text:line-break/><text:span text:style-name="T1"> </text:span><text:span text:style-name="T2">(63/2) </text:span> ⲛⲁϥ ϩⲁ ⲧⲉϩⲏ ⲉⲙⲡⲁⲧⲟⲩϣⲱⲱⲧ’ ⲙ̅ⲡⲣⲱ‐ <text:line-break/><text:span text:style-name="T1"> </text:span><text:span text:style-name="T2">(63/3) </text:span> ⲙⲉ ⲛⲉⲩϣⲱⲱⲧ’ ⲛ̅ϩⲛ̅ⲑⲏⲣⲓⲟⲛ ⲛⲉ ϩⲛ̅ⲛⲟⲩ‐ <text:line-break/><text:span text:style-name="T1"> </text:span><text:span text:style-name="T2">(63/4) </text:span> ⲧⲉ ⲅⲁⲣ ⲁⲛ ⲛⲉ ⲛⲁⲉⲓ ⲉⲧⲟⲩϣⲱⲱⲧ’ ⲛⲁⲩ <text:line-break/><text:span text:style-name="T1"> </text:span><text:span text:style-name="T2">(63/5) </text:span> §ⲛ̅ⲥⲕⲉⲩⲟⲥ ⲛ̅ⲛⲁⲃⲁϭⲏⲉⲓⲛ ⲙⲛ̅ ⲛ̅ⲥⲕⲉⲩⲟⲥ <text:line-break/><text:span text:style-name="T1"> </text:span><text:span text:style-name="T2">(63/6) </text:span> ⲃ̅ⲃⲗϫⲉ ϣⲁⲩϣⲱⲡⲉ ⲉⲃⲟⲗ ϩⲓⲧⲙ̅ ⲡⲕⲱϩⲧ <text:line-break/><text:span text:style-name="T1"> </text:span><text:span text:style-name="T2">(63/7) </text:span> ⲁⲗⲗⲁ ⲛ̅ⲥⲕⲉⲩⲟⲥ ⲛ̅ⲛⲁⲃⲁϭⲏⲉⲓⲛ ⲉⲩϣⲁ‐ <text:line-break/><text:span text:style-name="T1"> </text:span><text:span text:style-name="T2">(63/8) </text:span> ⲟⲩⲱϭⲡ’ ⲡⲁⲗⲓⲛ’ ϣⲁⲩⲧⲁⲙⲓⲟⲟⲩ ⲛ̅ⲧⲁⲩ‐ <text:line-break/><text:span text:style-name="T1"> </text:span><text:span text:style-name="T2">(63/9) </text:span> ϣⲱⲡⲉ ⲅⲁⲣ ⲉⲃⲟⲗ ϩⲛ̅ ⲟⲩⲡ̅ⲛ̅ⲁ̅ ⲛ̅ⲥⲕⲉⲩⲟⲥ <text:line-break/><text:span text:style-name="T1"> </text:span><text:span text:style-name="T2">(63/10) </text:span> ⲇⲉ ⲃ̅ⲃⲗ̅ϫⲉ ⲉⲩϣⲁⲟⲩⲱϭⲡ’ ϣⲁⲩⲧⲁⲕⲟ <text:line-break/><text:span text:style-name="T1"> </text:span><text:span text:style-name="T2">(63/11) </text:span> ⲛ̅ⲧⲁⲩϣⲱⲡⲉ ⲅⲁⲣ ⲭⲱⲣⲓⲥ ⲛⲓϥⲉ §ⲟⲩⲉⲓⲱ <text:line-break/><text:span text:style-name="T1"> </text:span><text:span text:style-name="T2">(63/12) </text:span> ⲉϥⲕⲱⲧⲉ ϩⲁ ⲟⲩⲱⲛⲉ ⲛ̅ⲛⲟⲩⲧ ⲁϥⲛ̅ ϣⲉ ⲙ̅ⲙⲓⲗⲟⲥ <text:line-break/><text:span text:style-name="T1"> </text:span><text:span text:style-name="T2">(63/13) </text:span> ⲉⲃⲟⲗ ⲉϥ’ⲙⲟⲟϣⲉ ⲛ̅ⲧⲁⲣⲟⲩⲕⲁⲁϥ’ ⲉⲃⲟⲗ <text:line-break/><text:span text:style-name="T1"> </text:span><text:span text:style-name="T2">(63/14) </text:span> ⲁϥϩⲉ ⲉⲣⲟϥ ⲟⲛ ⲉϥϩⲙ̅ ⲡⲓⲙⲁ ⲡⲓⲙⲁ <text:line-break/><text:span text:style-name="T1"> </text:span><text:span text:style-name="T2">(63/15) </text:span> ⲟⲩⲛ ϩⲣ̅ⲣⲱⲙⲉ ϣⲟⲟⲡ’ ϣⲁⲩⲛ̅ ϩⲁϩ ⲙ̅ⲙⲟ‐ <text:line-break/><text:span text:style-name="T1"> </text:span><text:span text:style-name="T2">(63/16) </text:span> ⲟϣⲉ’ ⲉⲃⲟⲗ’ ⲁⲩⲱ ⲙⲁⲩⲡⲣⲟⲕⲟⲡⲧⲉ ⲉ‐ <text:line-break/><text:span text:style-name="T1"> </text:span><text:span text:style-name="T2">(63/17) </text:span> ⲗⲁⲁⲩ ⲙ̅ⲙⲁ ⲛ̅ⲧⲁⲣⲉ ⲣⲟⲩϩⲉ ϣⲱⲡⲉ ⲉⲣⲟ‐ <text:line-break/><text:span text:style-name="T1"> </text:span><text:span text:style-name="T2">(63/18) </text:span> ⲟⲩ ⲟⲩⲧⲉ ⲙ̅ⲡⲟⲩⲛⲁⲩ ⲉⲡⲟⲗⲓⲥ ⲟⲩⲧⲉ <text:line-break/><text:span text:style-name="T1"> </text:span><text:span text:style-name="T2">(63/19) </text:span> ⲕⲱⲙⲏ ⲟⲩⲧⲉ ⲕⲧⲓⲥⲓⲥ ⲟⲩⲧⲉ ⲫⲩⲥⲓⲥ ⲙⲛ̅ <text:line-break/><text:span text:style-name="T1"> </text:span><text:span text:style-name="T2">(63/20) </text:span> ⲇⲩⲛⲁⲙⲓⲥ’ ⲙⲛ̅ ⲁⲅ’ⲅⲉⲗⲟⲥ ⲉⲓⲕⲏ ⲁⲛⲧⲁⲗⲁⲓ‐ <text:line-break/><text:span text:style-name="T1"> </text:span><text:span text:style-name="T2">(63/21) </text:span> ⲡⲱⲣⲟⲥ ϩⲓⲥⲉ §ⲧⲉⲩⲭⲁⲣⲓⲥⲧⲉⲓⲁ ⲡⲉ ⲓ̅ⲥ̅ ⲉⲩ‐ <text:line-break/><text:span text:style-name="T1"> </text:span><text:span text:style-name="T2">(63/22) </text:span> ⲙⲟⲩⲧⲉ ⲅⲁⲣ’ ⲉⲣⲟϥ’ ⲙ̅ⲙⲛⲧⲥⲩⲣⲟⲥ ϫⲉ ⲫⲁ‐ <text:line-break/><text:span text:style-name="T1"> </text:span><text:span text:style-name="T2">(63/23) </text:span> ⲣⲓⲥⲁⲑⲁ ⲉⲧⲉ ⲡⲁⲉⲓ ⲡⲉ ⲡⲉⲧⲡⲟⲣϣ’ ⲉⲃⲟⲗ <text:line-break/><text:span text:style-name="T1"> </text:span><text:span text:style-name="T2">(63/24) </text:span> ⲁⲓⲥ̅ ⲅⲁⲣ ⲉⲓ ⲉϥ’ⲥⲧⲁⲩⲣⲟⲩ ⲙ̅ⲡⲕⲟⲥⲙⲟⲥ <text:line-break/><text:span text:style-name="T1"> </text:span><text:span text:style-name="T2">(63/25) </text:span> §ⲁⲡϫⲟⲉⲓⲥ ⲃⲱⲕ’ ⲉϩⲟⲩ[ⲛ] ⲉⲡⲙⲁ ⲛ̅ϫⲱϭⲉ <text:line-break/><text:span text:style-name="T1"> </text:span><text:span text:style-name="T2">(63/26) </text:span> ⲛ̅ⲗⲉⲩⲉⲓ ⲁϥϥⲓ ϣⲃⲉⲥⲛⲟⲟⲩⲥ ⲛ̅ⲭⲣⲱⲙⲁ <text:line-break/><text:span text:style-name="T1"> </text:span><text:span text:style-name="T2">(63/27) </text:span> ⲁϥⲛⲟϫⲟⲩ ⲁⲧⲣⲟϩⲧⲉ ⲁϥⲛ̅ⲧⲟⲩ ⲉϩⲣⲁⲓ̈ <text:line-break/><text:span text:style-name="T1"> </text:span><text:span text:style-name="T2">(63/28) </text:span> ⲉⲩⲟⲃϣ ⲧⲏⲣⲟⲩ ⲁⲩⲱ ⲡⲉϫⲁϥ ϫⲉ ⲧⲁⲉⲓ <text:line-break/><text:soft-page-break/><text:span text:style-name="T1"> </text:span><text:span text:style-name="T2">(63/29) </text:span> ⲧⲉ ⲑⲉ ⲛ̅ⲧⲁϥⲉⲓ ⲙ̅ⲙⲟⲥ̣ ⲛ̅ϭⲓ ⲡϣⲏⲣ⟦ⲉ ⲙ̅‐ <text:line-break/><text:span text:style-name="T1"> </text:span><text:span text:style-name="T2">(63/30) </text:span> ⲡϣⲏⲣ⟧ⲉ ⲙ̅ⲡⲣⲱ̣ⲙ[ⲉ ⲉ]ϥ̣[ⲟ] ⲛ̅ϫϭ̣ⲓⲧ’ §ⲧⲥⲟ‐ <text:line-break/><text:span text:style-name="T1"> </text:span><text:span text:style-name="T2">(63/31) </text:span> ⲫⲓⲁ ⲉⲧⲟⲩⲙⲟⲩⲧ̣[ⲉ ⲉⲣⲟ]ⲥ̣ ϫⲉ ⲧⲥⲧⲓⲣⲁ ⲛ̅‐ <text:line-break/><text:span text:style-name="T1"> </text:span><text:span text:style-name="T2">(63/32) </text:span> ⲧⲟⲥ ⲧⲉ ⲧⲙⲁⲁ[ⲩ ⲛ̅ⲛ̅ⲁⲅ]ⲅ̣ⲉⲗⲟⲥ ⲁⲩⲱ̣ [ⲧ]ⲕⲟⲓ̣‐ <text:line-break/><text:span text:style-name="T1"> </text:span><text:span text:style-name="T2">(63/33) </text:span> ⲛⲱⲛⲟⲥ ⲙ̅ⲡⲥ[... ⲙⲁ]ⲣ̣ⲓⲁ ⲧⲙⲁⲅ̣[ⲇⲁ]‐ <text:line-break/><text:span text:style-name="T1"> </text:span><text:span text:style-name="T2">(63/34) </text:span> ⲗⲏⲛⲏ ⲛⲉⲣⲉ ⲡ.[..... ⲙⲉ] ⲙ̣̅ⲙⲟ̣[ⲥ ⲛ̅]‐ <text:line-break/><text:span text:style-name="T1"> </text:span><text:span text:style-name="T2">(63/35) </text:span> ϩⲟⲩⲟ ⲁⲙ̅ⲙⲁⲑⲏⲧ[ⲏⲥ ⲧⲏⲣⲟⲩ ⲁⲩⲱ ⲛⲉϥ]‐ <text:line-break/><text:span text:style-name="T1"> </text:span><text:span text:style-name="T2">(63/36) </text:span> ⲁⲥⲡⲁⲍⲉ ⲙ̅ⲙⲟⲥ ⲁⲧⲉⲥ̣[...... ⲛ̅ϩⲁϩ] <text:line-break/><text:span text:style-name="T1"> </text:span><text:span text:style-name="T2">(63/37) </text:span> ⲛ̅ⲥⲟⲡ’ ⲁⲡⲕⲉⲥⲉⲉⲡⲉ ⲙ̣̅[ⲙⲁⲑⲏⲧⲏⲥ <text:line-break/><text:span text:style-name="T1"> </text:span><text:span text:style-name="T2">(64/1) </text:span> ..].ⲉⲣⲟ.[.].[..]ⲙⲁ ⲡⲉϫⲁⲩ ⲛⲁϥ’ ϫⲉ <text:line-break/><text:span text:style-name="T1"> </text:span><text:span text:style-name="T2">(64/2) </text:span> ⲉⲧⲃⲉ ⲟⲩ ⲕⲙⲉ ⲙ̅ⲙⲟⲥ ⲡⲁⲣⲁⲣⲟⲛ’ ⲧⲏⲣⲛ̅ ⲁϥ’‐ <text:line-break/><text:span text:style-name="T1"> </text:span><text:span text:style-name="T2">(64/3) </text:span> ⲟⲩⲱϣⲃ̅ ⲛ̅ϭⲓ ⲡⲥⲱⲧⲏⲣ’ ⲡⲉϫⲁϥ ⲛⲁⲩ {ⲡⲉ‐ <text:line-break/><text:span text:style-name="T1"> </text:span><text:span text:style-name="T2">(64/4) </text:span> ϫⲁϥ ⲛⲁⲩ} ϫⲉ ⲉⲧⲃⲉ ⲟⲩ ϯⲙⲉ ⲙ̅ⲙⲱⲧⲛ̅ ⲁⲛ’ <text:line-break/><text:span text:style-name="T1"> </text:span><text:span text:style-name="T2">(64/5) </text:span> ⲛ̅ⲧⲉⲥϩⲉ ⲟⲩⲃ̅ⲗⲗⲉ ⲙⲛ̅ ⲟⲩⲁ ⲉϥⲛⲁⲩ ⲉⲃⲟⲗ <text:line-break/><text:span text:style-name="T1"> </text:span><text:span text:style-name="T2">(64/6) </text:span> ⲉⲩϩⲙ̅ ⲡⲕⲁⲕⲉ ⲙ̅ⲡⲉⲥⲛⲁⲩ ⲥⲉϣⲟⲃⲉ ⲉⲛⲟⲩ‐ <text:line-break/><text:span text:style-name="T1"> </text:span><text:span text:style-name="T2">(64/7) </text:span> ⲉⲣⲏⲩ ⲁⲛ ϩⲟⲧⲁⲛ’ ⲉⲣϣⲁ ⲡⲟⲩⲟⲉⲓⲛ ⲉⲓ’ ⲧⲟⲧⲉ <text:line-break/><text:span text:style-name="T1"> </text:span><text:span text:style-name="T2">(64/8) </text:span> ⲡⲉⲧⲛⲁⲃⲟⲗ’ ϥⲛⲁⲛⲁⲩ ⲉⲡⲟⲩⲟⲉⲓⲛ ⲁⲩⲱ <text:line-break/><text:span text:style-name="T1"> </text:span><text:span text:style-name="T2">(64/9) </text:span> ⲡⲉⲧⲟ ⲃ̅ⲃⲗ̅ⲗⲉ ⲉϥⲛⲁϭⲱ ϩⲙ̅ ⲡⲕⲁⲕⲉ §ⲡⲉ’‐ <text:line-break/><text:span text:style-name="T1"> </text:span><text:span text:style-name="T2">(64/10) </text:span> ϫⲉ ⲡϫⲟⲉⲓⲥ ϫⲉ ⲟⲩⲙⲁⲕⲁⲣⲓⲟⲥ ⲡⲉ ⲡⲉⲧ’ϣⲟ‐ <text:line-break/><text:span text:style-name="T1"> </text:span><text:span text:style-name="T2">(64/11) </text:span> ⲟⲡ’ ϩⲁ ⲧⲉϩⲏ ⲉⲙ’ⲡⲁⲧⲉϥ’ϣⲱⲡⲉ’ ⲡⲉⲧϣⲟ‐ <text:line-break/><text:span text:style-name="T1"> </text:span><text:span text:style-name="T2">(64/12) </text:span> ⲟⲡ’ ⲅⲁⲣ ⲁϥϣⲱⲡⲉ ⲁⲩⲱ ϥⲛⲁϣⲱⲡⲉ §ⲡϫⲓ‐ <text:line-break/><text:span text:style-name="T1"> </text:span><text:span text:style-name="T2">(64/13) </text:span> ⲥⲉ ⲙ̅ⲡⲣⲱⲙⲉ ϥⲟⲩⲟⲛϩ ⲁⲛ’ ⲉⲃⲟⲗ’ ⲁⲗⲗⲁ <text:line-break/><text:span text:style-name="T1"> </text:span><text:span text:style-name="T2">(64/14) </text:span> ϥϣⲟⲟⲡ’ ϩⲙ̅ ⲡⲉⲑⲏⲡ’ ⲉⲧⲃⲉ ⲡⲁⲉⲓ ϥⲟ ⲛ̅‐ <text:line-break/><text:span text:style-name="T1"> </text:span><text:span text:style-name="T2">(64/15) </text:span> ϫⲟⲉⲓⲥ ⲁⲛ’ⲑⲏⲣⲓⲟⲛ ⲉⲧϫⲟⲟⲡ’ ⲉⲣⲟϥ’ ⲉⲧⲛⲉ‐ <text:line-break/><text:span text:style-name="T1"> </text:span><text:span text:style-name="T2">(64/16) </text:span> ⲁⲩ ⲕ’ⲁⲧⲁ ⲡⲉⲧⲟⲩⲟⲛϩ ⲉⲃⲟⲗ’ ⲙⲛ̅ ⲡⲉⲑⲏⲡ’ <text:line-break/><text:span text:style-name="T1"> </text:span><text:span text:style-name="T2">(64/17) </text:span> ⲁⲩⲱ ⲡⲁⲉⲓ ϯ ⲛⲁⲩ ⲙ̅ⲡⲙⲟⲩⲛ’ ⲉⲃⲟⲗ ⲉⲣϣⲁ’ <text:line-break/><text:span text:style-name="T1"> </text:span><text:span text:style-name="T2">(64/18) </text:span> ⲡⲣⲱⲙⲉ ⲇⲉ ⲡⲱⲣϫ’ ⲉⲣⲟⲟⲩ ϣⲁⲩⲙⲟⲩⲟⲩⲧ’ <text:line-break/><text:span text:style-name="T1"> </text:span><text:span text:style-name="T2">(64/19) </text:span> ⲛ̅ⲛⲟⲩⲉⲣⲏⲩ ⲛ̅ⲥⲉⲡⲱϩⲥ ⲛ̅ⲛⲟⲩⲉⲣⲏⲩ <text:line-break/><text:span text:style-name="T1"> </text:span><text:span text:style-name="T2">(64/20) </text:span> ⲁⲩⲱ ⲁⲩⲟⲩⲱⲙ ⲛ̅ⲛⲟⲩⲉⲣⲏⲩ ϫⲉ ⲙ̅ⲡⲟⲩϩⲉ <text:line-break/><text:span text:style-name="T1"> </text:span><text:span text:style-name="T2">(64/21) </text:span> ⲉⲧⲣⲟⲫⲏ ⲧⲉⲛⲟⲩ ⲇⲉ ⲁⲩϩⲉ ⲉⲧⲣⲟⲫⲏ ⲉⲃⲟⲗ <text:line-break/><text:span text:style-name="T1"> </text:span><text:span text:style-name="T2">(64/22) </text:span> ϫⲉ ⲁⲡⲣⲱⲙⲉ ⲣ̅ ϩⲱⲃ ⲉⲡⲕⲁϩ §ⲉⲣϣⲁ ⲟⲩⲁ’ <text:line-break/><text:span text:style-name="T1"> </text:span><text:span text:style-name="T2">(64/23) </text:span> ⲃⲱⲕ’ ⲉⲡⲉⲥⲏⲧ’ ⲉⲡⲙⲟⲟⲩ ⲛ̅ϥⲉⲓ ⲉϩⲣⲁⲓ̈ ⲉⲙ’‐ <text:line-break/><text:span text:style-name="T1"> </text:span><text:span text:style-name="T2">(64/24) </text:span> ⲡⲉϥϫⲓ ⲗⲁⲁⲩ ⲛ̅ϥϫⲟⲟⲥ ϫⲉ ⲁⲛⲟⲕ’ ⲟⲩⲭⲣⲏ‐ <text:line-break/><text:span text:style-name="T1"> </text:span><text:span text:style-name="T2">(64/25) </text:span> ⲥⲧⲓⲁⲛⲟⲥ ⲛ̅ⲧⲁϥϫⲓ ⲙ̅ⲡⲣⲁⲛ’ ⲉⲧⲙⲏⲥⲉ ⲉϥ’‐ <text:line-break/><text:span text:style-name="T1"> </text:span><text:span text:style-name="T2">(64/26) </text:span> ϣⲁϫⲓ ⲇⲉ ⲙ̅ⲡⲡ̅ⲛ̣̅̅ⲁ̅ ⲉⲧⲟⲩⲁⲁⲃ ⲟⲩⲛ̅ⲧⲁϥ ⲙ̅‐ <text:line-break/><text:span text:style-name="T1"> </text:span><text:span text:style-name="T2">(64/27) </text:span> ⲙⲁⲩ ⲛ̅ⲧⲇⲱⲣⲉⲁ ⲙ̅ⲡⲣⲁⲛ ⲡⲉⲛ̅ⲧⲁϩϫⲓ ⲛ̅ⲟⲩ‐ <text:line-break/><text:span text:style-name="T1"> </text:span><text:span text:style-name="T2">(64/28) </text:span> ⲇⲱⲣⲉⲁ ⲙⲁⲩϥⲓⲧⲥ̅ ⲛ̅ⲧⲟⲟⲧϥ’ ⲡⲉⲛⲧⲁϩϫⲓ ⲇⲉ <text:line-break/><text:span text:style-name="T1"> </text:span><text:span text:style-name="T2">(64/29) </text:span> ⲉϫⲱϥ’ ⲉⲧⲙ̣ⲏⲥⲉ ϣⲁⲩϣⲁⲧϥ’ ⲧⲁⲉⲓ ⲧⲉ ⲑⲉ <text:line-break/><text:span text:style-name="T1"> </text:span><text:span text:style-name="T2">(64/30) </text:span> ⲉⲧϣⲟ̣[ⲟ]ⲡ ⲛⲁ̣ⲛ ⲉⲣϣⲁ ⲟⲩⲁ ϣⲱⲡⲉ ϩⲛ̅ <text:line-break/><text:span text:style-name="T1"> </text:span><text:span text:style-name="T2">(64/31) </text:span> ⲟⲩⲙⲩⲥⲧⲏⲣⲓⲟ[ⲛ’] §[ⲡⲙ]ⲩ̣ⲥⲧⲏⲣⲓⲟⲛ ⲙⲡⲅⲁ‐ <text:line-break/><text:span text:style-name="T1"> </text:span><text:span text:style-name="T2">(64/32) </text:span> ⲙ[ⲟⲥ]’ ⲟⲩⲛⲟϭ [ⲡⲉ ⲁϫⲛ̅]ⲧ̣ϥ̅ ⲅⲁⲣ ⲛⲉ ⲡⲕⲟⲥ‐ <text:line-break/><text:span text:style-name="T1"> </text:span><text:span text:style-name="T2">(64/33) </text:span> [ⲙⲟ]ⲥ̣ ⲛⲁϣⲱ[ⲡⲉ ⲁⲛ ⲧⲥ]ⲩ̣ⲥⲧⲁⲥⲓⲥ ⲅⲁⲣ’ ⲙ̅‐ <text:line-break/><text:span text:style-name="T1"> </text:span><text:span text:style-name="T2">(64/34) </text:span> [ⲡⲕⲟ]ⲥ̣ⲙⲟ[ⲥ.....]ⲙⲉ ⲧⲥⲩⲥⲧⲁⲥⲓⲥ ⲇⲉ <text:line-break/><text:span text:style-name="T1"> </text:span><text:span text:style-name="T2">(64/35) </text:span> [........ ⲡⲅ]ⲁ̣ⲙⲟⲥ ⲉⲣⲓⲛⲟⲉⲓ ⲛ̅ⲧⲕⲟⲓ‐ <text:line-break/><text:span text:style-name="T1"> </text:span><text:span text:style-name="T2">(64/36) </text:span> [ⲛⲱⲛⲓⲁ .. ϫ]ⲱϩⲙ̅ ϫⲉ ⲟⲩⲛ̅ⲧ̅ⲁⲥ ⲙ̅ⲙⲁⲩ <text:line-break/><text:span text:style-name="T1"> </text:span><text:span text:style-name="T2">(64/37) </text:span> [.......]ⲇ̣ⲩⲛⲁⲙⲓⲥ ⲧⲉⲥϩⲓⲕⲱⲛ <text:line-break/><text:span text:style-name="T1"> </text:span><text:span text:style-name="T2">(65/1) </text:span> ⲉⲥϣⲟⲟⲡ ϩⲛ̅ ⲟⲩϫⲱ̣[ϩⲙ̅] §[ⲛ̅]ⲥ̣ⲭ̣[ⲏⲙ]ⲁ ⲙⲡⲛ̣̅[ⲁ̅] <text:line-break/><text:soft-page-break/><text:span text:style-name="T1"> </text:span><text:span text:style-name="T2">(65/2) </text:span> ⲛ̅ⲁⲕⲁⲑⲁⲣⲧⲟⲛ ⲟⲩⲛ̅ ϩ̣ⲟⲟ̣ⲩⲧ ⲛ̅ϩⲏⲧⲟⲩ ⲟⲩ‐ <text:line-break/><text:span text:style-name="T1"> </text:span><text:span text:style-name="T2">(65/3) </text:span> ⲛ̅ ϩⲛ̅ⲥϩⲓⲟⲙⲉ ⲛ̅ϩⲟⲟⲩⲧ ⲙⲉⲛ ⲛⲉ ⲉⲧⲣ̅ⲕⲟⲓ‐ <text:line-break/><text:span text:style-name="T1"> </text:span><text:span text:style-name="T2">(65/4) </text:span> ⲛⲱⲛⲉⲓ ⲁⲙⲯⲩⲭⲏ ⲉⲧⲣ̅ⲡⲟⲗⲓⲧⲉⲩⲉⲥⲑⲉ <text:line-break/><text:span text:style-name="T1"> </text:span><text:span text:style-name="T2">(65/5) </text:span> ϩⲛ̅ⲛⲟⲩⲥⲭⲏⲙⲁ ⲛ̅ⲥϩⲓⲙⲉ ⲛ̅ⲥϩⲓⲟⲙⲉ ⲇⲉ <text:line-break/><text:span text:style-name="T1"> </text:span><text:span text:style-name="T2">(65/6) </text:span> ⲛⲉ ⲛⲉⲧ̅ⲧⲏϩ ⲙⲛ̅ ⲛⲉⲧϩⲛ̅ ⲟⲩⲥⲭⲏⲙⲁ ⲛ̅‐ <text:line-break/><text:span text:style-name="T1"> </text:span><text:span text:style-name="T2">(65/7) </text:span> ϩⲟⲟⲩⲧ’ ⲉⲃⲟⲗ ϩⲓⲧⲛ̅ ⲟⲩⲁⲧ’ⲧⲱⲧ’ ⲁⲩⲱ ⲙⲛ̅ <text:line-break/><text:span text:style-name="T1"> </text:span><text:span text:style-name="T2">(65/8) </text:span> ⲗⲁⲁⲩ ⲛⲁϣⲣ̅ ⲃⲟⲗ ⲉⲛⲁⲉⲓ ⲉⲩⲉⲙⲁϩⲧⲉ ⲙ̅‐ <text:line-break/><text:span text:style-name="T1"> </text:span><text:span text:style-name="T2">(65/9) </text:span> ⲙⲟϥ’ ⲉϥⲧⲙ̅ϫⲓ ⲛ̅ⲟⲩϭⲟⲙ ⲛ̅ϩⲟⲟⲩⲧ’ ⲙⲛ̅‐ <text:line-break/><text:span text:style-name="T1"> </text:span><text:span text:style-name="T2">(65/10) </text:span> ⲛⲟⲩⲥϩⲓⲙⲉ ⲉⲧⲉ ⲡⲛⲩⲙⲫⲓⲟⲥ ⲡⲉ ⲙⲛ <text:line-break/><text:span text:style-name="T1"> </text:span><text:span text:style-name="T2">(65/11) </text:span> ⲧⲛⲩⲙⲫⲏ ⲟⲩⲁ ⲇⲉ ϫⲓ ⲉⲃⲟⲗ ϩⲙ̅ ⲡⲛⲩⲙ’‐ <text:line-break/><text:span text:style-name="T1"> </text:span><text:span text:style-name="T2">(65/12) </text:span> ⲫⲱⲛ ⲛ̅ϩⲓⲕⲟⲛⲓⲕⲟⲥ ⲗ ϩⲟⲧⲁⲛ ⲉⲣϣⲁ ⲛ̅ⲥϩⲓ‐ <text:line-break/><text:span text:style-name="T1"> </text:span><text:span text:style-name="T2">(65/13) </text:span> ⲙⲉ ⲛ̅ⲁⲧⲥⲃⲱ ⲛⲁⲩ ⲁⲩϩⲟⲟⲩⲧ’ ⲉϥϩⲙⲟⲟⲥ <text:line-break/><text:span text:style-name="T1"> </text:span><text:span text:style-name="T2">(65/14) </text:span> ⲟⲩⲁⲁϥ’ ϣⲁⲩϥⲱϭⲉ ⲉϩⲣⲁⲓ̈ ⲉϫⲱϥ ⲛ̅ⲥⲉ‐ <text:line-break/><text:span text:style-name="T1"> </text:span><text:span text:style-name="T2">(65/15) </text:span> ⲥⲱⲃⲉ ⲛⲙ̅ⲙⲁϥ’ ⲛ̅ⲥⲉϫⲟϩⲙⲉϥ’ ⲧⲉⲉⲓϩⲉ <text:line-break/><text:span text:style-name="T1"> </text:span><text:span text:style-name="T2">(65/16) </text:span> ⲟⲛ ϩⲣ̅ⲣⲱⲙⲉ ⲛ̅ⲁⲧ’ⲥⲃⲱ ⲉⲩϣⲁⲛⲛⲁⲩ ⲉⲩ‐ <text:line-break/><text:span text:style-name="T1"> </text:span><text:span text:style-name="T2">(65/17) </text:span> ⲥϩⲓⲙⲉ ⲉⲥϩⲙⲟⲟⲥ ⲟⲩⲁⲁⲧⲥ̅ ⲉⲛⲉⲥⲱⲥ <text:line-break/><text:span text:style-name="T1"> </text:span><text:span text:style-name="T2">(65/18) </text:span> ϣⲁⲩⲡⲓⲑⲉ ⲙ̅ⲙⲟⲥ ⲛ̅ⲥⲉⲣ̅ⲃⲓⲁⲍⲉ ⲙ̅ⲙⲟⲥ <text:line-break/><text:span text:style-name="T1"> </text:span><text:span text:style-name="T2">(65/19) </text:span> ⲉⲩⲟⲩⲱϣ ⲉϫⲟϩⲙⲉⲥ ⲉⲩϣⲁⲛⲛⲁⲩ ⲇⲉ <text:line-break/><text:span text:style-name="T1"> </text:span><text:span text:style-name="T2">(65/20) </text:span> ⲁⲡϩⲟⲟⲩⲧ’ ⲙⲛ̅ ⲧⲉϥϩⲓⲙⲉ ⲉⲩϩⲙⲟⲟⲥ ϩⲁ‐ <text:line-break/><text:span text:style-name="T1"> </text:span><text:span text:style-name="T2">(65/21) </text:span> ⲧⲛ̅ ⲛⲟⲩⲉⲣⲏⲩ ⲙⲁⲣⲉ ⲛ̅ϩⲓⲟⲙⲉ ϣⲃⲱⲕ’ ⲉ‐ <text:line-break/><text:span text:style-name="T1"> </text:span><text:span text:style-name="T2">(65/22) </text:span> ϩⲟⲩⲛ ϣⲁ ⲡϩⲟⲟⲩⲧ ⲟⲩⲧⲉ ⲙⲁⲣⲉ ⲛ̅ϩⲟⲟⲩⲧ <text:line-break/><text:span text:style-name="T1"> </text:span><text:span text:style-name="T2">(65/23) </text:span> ϣⲃⲱⲕ’ ⲉϩⲟⲩⲛ̅ ϣⲁ ⲧⲥϩⲓⲙⲉ ⲧⲁⲉⲓ ⲧⲉ ⲑⲉ <text:line-break/><text:span text:style-name="T1"> </text:span><text:span text:style-name="T2">(65/24) </text:span> ⲉⲣϣⲁ ⲑⲓⲕⲱⲛ’ ⲙⲛ̅ ⲡ[ⲁ]ⲅ’ⲅⲉⲗⲟⲥ ϩⲱⲧⲣ̅ ⲉ‐ <text:line-break/><text:span text:style-name="T1"> </text:span><text:span text:style-name="T2">(65/25) </text:span> ⲛⲟⲩⲉⲣⲏⲩ ⲟⲩⲧⲉ ⲙⲛ̅ [ⲗⲁ]ⲁⲩ ⲛⲁϣⲣ̅ⲧⲟⲗⲙⲁ <text:line-break/><text:span text:style-name="T1"> </text:span><text:span text:style-name="T2">(65/26) </text:span> ⲁⲃⲱⲕ’ ⲉϩⲟⲩⲛ ϣⲁ ⲫ[ϩⲟ]ⲟ̣ⲩⲧ’ ⲏ ⲧⲥϩⲓⲙⲉ <text:line-break/><text:span text:style-name="T1"> </text:span><text:span text:style-name="T2">(65/27) </text:span> §ⲡⲉⲧⲛ̅ⲛⲏⲩ ⲉⲃⲟⲗ ϩⲙ̣̅ ⲡⲕⲟⲥⲙⲟⲥ ⲛ̅ⲥⲉ‐ <text:line-break/><text:span text:style-name="T1"> </text:span><text:span text:style-name="T2">(65/28) </text:span> ⲧⲙ̅ϣⲉⲙⲁϩⲧⲉ ⲙ̅ⲙⲟ̣ϥ̣’ ⲉⲧⲓ ϫⲉ ⲛⲉϥϩⲙ̅ <text:line-break/><text:span text:style-name="T1"> </text:span><text:span text:style-name="T2">(65/29) </text:span> ⲡⲕⲟⲥⲙⲟⲥ ϥⲟⲩⲟⲛ̣[ϩ] ⲉⲃⲟⲗ̣ ϫⲉ ϥϫⲟⲥⲉ <text:line-break/><text:span text:style-name="T1"> </text:span><text:span text:style-name="T2">(65/30) </text:span> ⲁⲧⲉⲡⲓⲑⲩⲙⲓⲁ ⲙ̣̅ⲡ[..]ϥ̣’[..]ⲉ̣ [ⲙ]ⲛ̣̅ ⲑ̣ⲣ̅ⲧⲉ <text:line-break/><text:span text:style-name="T1"> </text:span><text:span text:style-name="T2">(65/31) </text:span> ϥⲟ ⲛ̅ϫⲟⲉⲓⲥ ⲁ..[..]ⲥ̣[.]ⲥ ϥⲥⲟⲧⲡ’ ⲉ‐ <text:line-break/><text:span text:style-name="T1"> </text:span><text:span text:style-name="T2">(65/32) </text:span> ⲡⲕⲱϩ ⲉϣϫⲉ̣ [....]ⲩ̣ ⲉⲓ ⲥⲉⲁⲙ[ⲁ]ϩ̣ⲧⲉ <text:line-break/><text:span text:style-name="T1"> </text:span><text:span text:style-name="T2">(65/33) </text:span> ⲙ̅ⲙⲟϥ’ ⲥⲉⲱϭ[ⲧ ⲙ̅ⲙⲟϥ] ⲁ̣ⲩⲱ ⲡⲱ̣[ⲥ ⲉϥ’]‐ <text:line-break/><text:span text:style-name="T1"> </text:span><text:span text:style-name="T2">(65/34) </text:span> ⲛⲁϣⲣ̅ ⲃⲟⲗ ⲁⲛⲛ̣[ⲟϭ ⲛ̅ⲇⲩⲛ]ⲁⲙⲓ̣[ⲥ ....] <text:line-break/><text:span text:style-name="T1"> </text:span><text:span text:style-name="T2">(65/35) </text:span> ⲧⲉ ⲡⲱⲥ ϥⲛⲁϣϩ[..........] <text:line-break/><text:span text:style-name="T1"> </text:span><text:span text:style-name="T2">(65/36) </text:span> ⲕⲓⲥ ⲟⲩⲛ̅ ϩⲟⲉⲓⲛⲉ ⲉⲩ̣[ϫⲱ ⲙ̅ⲙⲟⲥ’ ϫⲉ] <text:line-break/><text:span text:style-name="T1"> </text:span><text:span text:style-name="T2">(65/37) </text:span> ⲁⲛⲟⲛ ϩⲙ̅ⲡⲓⲥⲧⲟⲥ ϩⲟⲡⲱ̣[ⲥ......] <text:line-break/><text:span text:style-name="T1"> </text:span><text:span text:style-name="T2">(66/1) </text:span> [.ⲡ]ⲛ̣̅̅ⲁ̣̅̅ ⲛ̅ⲁ[ⲕⲁⲑⲁⲣⲧⲟ]ⲛ̣ ϩⲓ ⲇⲁⲓⲙⲟⲛⲓⲟⲛ <text:line-break/><text:span text:style-name="T1"> </text:span><text:span text:style-name="T2">(66/2) </text:span> ⲛⲉⲩⲛ̅ⲧⲁⲩ ⲅⲁⲣ ⲙ̣̅ⲙⲁ[ⲩ] ⲙ̅ⲡⲛ̅ⲁ̅ ⲉⲧⲟⲩⲁⲁⲃ <text:line-break/><text:span text:style-name="T1"> </text:span><text:span text:style-name="T2">(66/3) </text:span> ⲛⲉ ⲙⲛ̅ ⲡⲛ̅ⲁ̅ ⲛ̣̅ⲁⲕⲁⲑⲁⲣⲧⲟⲛ ⲛⲁⲣ̅ⲕⲟⲗⲗⲁ <text:line-break/><text:span text:style-name="T1"> </text:span><text:span text:style-name="T2">(66/4) </text:span> ⲉⲣⲟⲟⲩ ⲙⲛ̅ⲣ̅ ϩⲟⲧⲉ ϩⲏⲧⲥ̅ ⲛ̅ⲧⲥⲁⲣⲝ ⲟⲩⲇⲉ <text:line-break/><text:span text:style-name="T1"> </text:span><text:span text:style-name="T2">(66/5) </text:span> ⲙⲛ̅ⲙⲉⲣⲓⲧⲥ̅ ⲉⲕϣⲁⲣ̅ ϩⲟⲧⲉ ϩⲏⲧⲥ̅ ⲥⲛⲁⲣ̅ ϫⲟ‐ <text:line-break/><text:span text:style-name="T1"> </text:span><text:span text:style-name="T2">(66/6) </text:span> ⲉⲓⲥ ⲉⲣⲟⲕ’ ⲉⲕϣⲁⲛⲙⲉⲣⲓⲧⲥ̅ ⲥⲛⲁⲟⲙ〈ⲕ〉ⲕ’ ⲛ̅ⲥⲟϭ〈ⲧ〉ⲕ’ <text:line-break/><text:span text:style-name="T1"> </text:span><text:span text:style-name="T2">(66/7) </text:span> §ⲏ ⲛ̅ϥϣⲱⲡⲉ ϩⲙ̅ ⲡⲉⲉⲓⲕⲟⲥⲙⲟⲥ ⲏ ϩⲛ̅ ⲧⲁⲛⲁ‐ <text:line-break/><text:span text:style-name="T1"> </text:span><text:span text:style-name="T2">(66/8) </text:span> ⲥⲧⲁⲥⲓⲥ ⲏ ϩⲛ̅ ⲛ̅ⲧⲟⲡⲟⲥ ⲉⲧϩⲛ̅ ⲧⲙⲏⲧⲉ <text:line-break/><text:span text:style-name="T1"> </text:span><text:span text:style-name="T2">(66/9) </text:span> ⲙⲏ ⲅⲉⲛⲟⲓⲧⲟ ⲛ̅ⲥⲉϩⲉ ⲉⲣⲟⲉⲓ ⲛ̅ϩⲏⲧⲟⲩ ⲡⲉ‐ <text:line-break/><text:span text:style-name="T1"> </text:span><text:span text:style-name="T2">(66/10) </text:span> ⲉⲓⲕⲟⲥⲙⲟⲥ ⲟⲩⲙ̅ ⲡⲉⲧⲛⲁⲛⲟⲩϥ ⲛ̅ϩⲏⲧϥ’ <text:line-break/><text:span text:style-name="T1"> </text:span><text:span text:style-name="T2">(66/11) </text:span> ⲟⲩⲙ̅ ⲡⲉⲑⲟⲟⲩ ⲛⲉϥⲡⲉⲧⲛⲁⲛⲟⲩⲟⲩ ⲙ̅ⲡⲉ‐ <text:line-break/><text:soft-page-break/><text:span text:style-name="T1"> </text:span><text:span text:style-name="T2">(66/12) </text:span> ⲧⲛⲁⲛⲟⲩⲟⲩ ⲁⲛ ⲛⲉ ⲁⲩⲱ ⲛⲉϥⲡⲉⲑⲟⲟⲩ ϩⲙ̅‐ <text:line-break/><text:span text:style-name="T1"> </text:span><text:span text:style-name="T2">(66/13) </text:span> ⲡⲉⲑⲟⲟⲩ ⲁⲛ ⲛⲉ ⲟⲩⲛ̅ ⲡⲉⲑⲟⲟⲩ ⲇⲉ ⲙⲛ̅ⲛ̅‐ <text:line-break/><text:span text:style-name="T1"> </text:span><text:span text:style-name="T2">(66/14) </text:span> ⲥⲁ ⲡⲉⲉⲓⲕⲟⲥⲙⲟⲥ ⲉϩⲙ̅ⲡⲉⲑⲟⲟⲩ ⲛⲁⲙⲉ ⲛⲉ <text:line-break/><text:span text:style-name="T1"> </text:span><text:span text:style-name="T2">(66/15) </text:span> ⲧⲉⲧⲟⲩⲙⲟⲩⲧⲉ ⲉⲣⲟⲥ ϫⲉ ⲧⲙⲉⲥⲟⲧⲏⲥ ⲛ̅ⲧⲟϥ’ <text:line-break/><text:span text:style-name="T1"> </text:span><text:span text:style-name="T2">(66/16) </text:span> ⲡⲉ ⲡⲙⲟⲩ ϩⲱⲥ ⲉⲛϣⲟⲟⲡ ϩⲙ̅ ⲡⲉⲉⲓⲕⲟⲥ‐ <text:line-break/><text:span text:style-name="T1"> </text:span><text:span text:style-name="T2">(66/17) </text:span> ⲙⲟⲥ ϣϣⲉ ⲉⲣⲟⲛ ⲉϫⲡⲟ ⲛⲁⲛ ⲛ̅ⲧⲁⲛⲁⲥⲧⲁ‐ <text:line-break/><text:span text:style-name="T1"> </text:span><text:span text:style-name="T2">(66/18) </text:span> ⲥⲓⲥ ϫⲉⲕⲁⲁⲥ ⲉⲛϣⲁⲕⲁⲁⲕⲛ ⲁϩⲏⲩ ⲛ̅ⲧⲥⲁⲣⲝ <text:line-break/><text:span text:style-name="T1"> </text:span><text:span text:style-name="T2">(66/19) </text:span> ⲉⲩⲛⲁϩⲉ ⲉⲣⲟⲛ ϩⲛ̅ ⲧⲁⲛⲁⲡⲁⲩⲥⲓⲥ ⲛ̅ⲧⲛ̅ⲧⲙ̅‐ <text:line-break/><text:span text:style-name="T1"> </text:span><text:span text:style-name="T2">(66/20) </text:span> ⲙⲟⲟϣⲉ ϩⲛ̅ ⲧⲙⲉⲥⲟⲧⲏⲥ ϩⲁϩ ⲅⲁⲣ’ ⲥⲉⲣ̅ⲡⲗⲁ‐ <text:line-break/><text:span text:style-name="T1"> </text:span><text:span text:style-name="T2">(66/21) </text:span> ⲛⲉⲥⲑⲉ ϩⲛ̅ ⲧϩⲓⲏ ⲛⲁⲛⲟⲩⲥ ⲅⲁⲣ ⲉⲉⲓ ⲉⲃⲟⲗ <text:line-break/><text:span text:style-name="T1"> </text:span><text:span text:style-name="T2">(66/22) </text:span> ϩⲙ̅ ⲡⲕⲟⲥⲙⲟⲥ ϩⲁ ⲧⲉϩⲏ ⲉⲙⲡⲁⲧⲉ ⲡⲣⲱⲙⲉ <text:line-break/><text:span text:style-name="T1"> </text:span><text:span text:style-name="T2">(66/23) </text:span> ⲣ̅ ⲛⲟⲃⲉ §ⲟⲩⲛ̅ ϩⲟⲉⲓⲛⲉ ⲙⲉⲛ ⲟⲩⲧⲉ ⲥⲉⲟⲩⲱϣ <text:line-break/><text:span text:style-name="T1"> </text:span><text:span text:style-name="T2">(66/24) </text:span> ⲁⲛ’ ⲟⲩⲧⲉ ⲙⲛ̅ ϭⲟⲙ̣ ⲙ̣̅ⲙⲟⲟⲩ ϩⲛ̅ⲕⲟⲟⲩⲉ ⲇⲉ <text:line-break/><text:span text:style-name="T1"> </text:span><text:span text:style-name="T2">(66/25) </text:span> ⲉⲩϣⲁⲛ’ⲟⲩⲱϣ’̣ ⲙⲛ̅ ϩⲏⲩ ϣⲟⲟⲡ’ ⲛⲁⲩ ϫⲉ <text:line-break/><text:span text:style-name="T1"> </text:span><text:span text:style-name="T2">(66/26) </text:span> ⲙ̅ⲡⲟⲩⲉⲓⲣⲉ ⲉⲡ[...]ⲩⲱϣ ⲅⲁⲣ’ ϥⲉⲓⲣⲉ ⲙ̅ⲙⲟ‐ <text:line-break/><text:span text:style-name="T1"> </text:span><text:span text:style-name="T2">(66/27) </text:span> ⲟⲩ ⲛ̅ⲣⲉϥⲣ̅ ⲛⲟⲃⲉ̣ [ⲉ]ⲩⲧⲙ̅ⲟⲩⲱϣ ⲇⲉ ⲧⲇⲓ‐ <text:line-break/><text:span text:style-name="T1"> </text:span><text:span text:style-name="T2">(66/28) </text:span> ⲕⲁⲓⲟⲥⲩⲛⲏ ⲛⲁϩⲱ̣ⲡ’ ⲉⲣⲟⲟⲩ ⲙ̅ⲡⲉⲥⲛⲁⲩ <text:line-break/><text:span text:style-name="T1"> </text:span><text:span text:style-name="T2">(66/29) </text:span> ⲁ̣ⲩⲱ ⲡⲟⲩⲱϣ ⲁⲛ̣ [ⲡⲉ] ⲛ̅ⲡⲉⲓⲣⲉ ⲁⲛ’ §ⲟⲩⲁⲡⲟ‐ <text:line-break/><text:span text:style-name="T1"> </text:span><text:span text:style-name="T2">(66/30) </text:span> ⲥⲧⲟⲗⲓⲕⲟ̣ⲥ [ϩ]ⲛ̣̅ ⲟ̣[ⲩ]ⲟ̣ⲡⲧ̣ⲁⲥⲓⲁ ⲁϥⲛⲁⲩ ⲁϩⲟ‐ <text:line-break/><text:span text:style-name="T1"> </text:span><text:span text:style-name="T2">(66/31) </text:span> ⲉⲓⲛⲉ ⲉⲩⲟⲧⲡ̣ [ⲉϩⲟⲩ]ⲛ ⲉ̣ⲩⲏⲉⲓ ⲛ̅ⲕⲱϩⲧ’ ⲁⲩ‐ <text:line-break/><text:span text:style-name="T1"> </text:span><text:span text:style-name="T2">(66/32) </text:span> ⲱ ⲉ̣[ⲩ]ⲙⲏⲣ ϩⲛ̅ [.....] ⲛ̅ⲕⲱϩⲧ ⲉⲩⲛⲏϫ <text:line-break/><text:span text:style-name="T1"> </text:span><text:span text:style-name="T2">(66/33) </text:span> [...]ⲛ̣̅ⲛ̅ⲕⲱϩⲧ [.....]ⲧ̣ⲟⲩ ⲙ̅ⲙⲟⲟⲩ ϩⲛ̅ <text:line-break/><text:span text:style-name="T1"> </text:span><text:span text:style-name="T2">(66/34) </text:span> [...ⲡⲓ]ⲥⲧⲓ[ⲥ]’ ⲛ̣̅[....] ⲁⲩⲱ ⲡⲉϫⲁⲩ ⲛⲁⲩ <text:line-break/><text:span text:style-name="T1"> </text:span><text:span text:style-name="T2">(66/35) </text:span> [ϫⲉ......... ϭ]ⲟⲙ’ ⲙ̅ⲙⲟⲟⲩ ⲁⲛⲟⲩϩ̅ⲙ̅ <text:line-break/><text:span text:style-name="T1"> </text:span><text:span text:style-name="T2">(66/36) </text:span> [...........] ⲙ̣̅ⲡⲟⲩⲟⲩⲱϣ’ ⲁⲩϫⲓ <text:line-break/><text:span text:style-name="T1"> </text:span><text:span text:style-name="T2">(66/37) </text:span> [........]ⲕⲟⲗⲁⲥⲓⲥ ⲡⲁⲉⲓ ⲉⲧⲟⲩⲙⲟⲩⲧⲉ <text:line-break/><text:span text:style-name="T1"> </text:span><text:span text:style-name="T2">(67/1) </text:span> ⲉⲣⲟϥ ϫⲉ ⲡⲕⲁⲕⲉ ⲉⲧ[......]ⲗ ϫⲉ ϥ.[....] <text:line-break/><text:span text:style-name="T1"> </text:span><text:span text:style-name="T2">(67/2) </text:span> §ⲉⲃⲟⲗ ϩⲛ̅ ⲟⲩⲙⲟⲟⲩ ⲙⲛ̣̅ ⲟⲩ̣ⲕⲱϩⲧ ⲛ̅ⲧⲁ ⲧⲯⲩⲭ̣[ⲏ] <text:line-break/><text:span text:style-name="T1"> </text:span><text:span text:style-name="T2">(67/3) </text:span> ⲙⲛ̅ ⲡⲡ̅ⲛ̅ⲁ̅ ϣⲱⲡⲉ ⲉⲃⲟⲗ ϩ̣ⲛ̣̅ ⲟⲩⲙⲟⲟⲩ ⲙⲛ̅ <text:line-break/><text:span text:style-name="T1"> </text:span><text:span text:style-name="T2">(67/4) </text:span> ⲟⲩⲕⲱϩⲧ’ ⲙⲛ̅ⲛⲟⲩⲟⲉⲓⲛ ⲛ̅ⲧⲁ ⲡϣⲏⲣⲉ’ ⲙ̅‐ <text:line-break/><text:span text:style-name="T1"> </text:span><text:span text:style-name="T2">(67/5) </text:span> ⲡⲛⲩⲙⲫⲱⲛ ⲡⲕⲱϩⲧ’ ⲡⲉ ⲡⲭⲣⲓⲥⲙⲁ ⲡⲟⲩⲟ‐ <text:line-break/><text:span text:style-name="T1"> </text:span><text:span text:style-name="T2">(67/6) </text:span> ⲉⲓⲛ ⲡⲉ ⲡⲕⲱϩⲧ’ ⲉⲉⲓϣⲁϫⲉ ⲁⲛ ⲁⲡⲉⲉⲓⲕⲱϩⲧ <text:line-break/><text:span text:style-name="T1"> </text:span><text:span text:style-name="T2">(67/7) </text:span> ⲉⲧⲉ ⲙⲛ̅ⲧⲁϥ’ ⲙⲟⲣⲫⲏ ⲁⲗⲗⲁ ⲡⲕⲉⲟⲩⲁ ⲉⲧⲉ 〈ⲧⲉ〉ϥ’‐ <text:line-break/><text:span text:style-name="T1"> </text:span><text:span text:style-name="T2">(67/8) </text:span> ⲙⲟⲣϥⲏ ⲟⲩⲁⲃϣ ⲉⲧⲟ ⲛ̅ⲟⲩⲟⲉⲓⲛ ⲉⲛⲉⲥⲱϥ’ <text:line-break/><text:span text:style-name="T1"> </text:span><text:span text:style-name="T2">(67/9) </text:span> ⲁⲩⲱ ⲉⲧϯ ⲛ̅ⲧⲙ̅ⲛ̅ⲧⲥⲁ §ⲧⲁⲗⲏⲑⲉⲓⲁ ⲙ̅ⲡⲉⲥⲉⲓ <text:line-break/><text:span text:style-name="T1"> </text:span><text:span text:style-name="T2">(67/10) </text:span> ⲉⲡⲕⲟⲥⲙⲟⲥ ⲉⲥⲕⲁⲕⲁϩⲏⲩ ⲁⲗⲗⲁ ⲛ̅ⲧⲁⲥⲉⲓ ϩⲛ̅ <text:line-break/><text:span text:style-name="T1"> </text:span><text:span text:style-name="T2">(67/11) </text:span> ⲛ̅ⲧⲩⲡⲟⲥ ⲙⲛ̅ ⲛ̅ϩⲓⲕⲱⲛ ϥⲛⲁϫⲓⲧⲥ̅ ⲁⲛ’ ⲛ̅ⲕⲉⲣⲏ‐ <text:line-break/><text:span text:style-name="T1"> </text:span><text:span text:style-name="T2">(67/12) </text:span> ⲧⲉ ⲟⲩⲛ̅ ⲟⲩϫⲡⲟ ⲛ̅ⲕⲉⲥⲟⲡ’ ϣⲟⲟⲡ ⲙⲛ̅ⲛⲟⲩ‐ <text:line-break/><text:span text:style-name="T1"> </text:span><text:span text:style-name="T2">(67/13) </text:span> ϩⲓⲕⲱⲛ ⲛ̅ϫⲡⲟ ⲛ̅ⲕⲉⲥⲟⲡ’ ϣϣⲉ ⲁⲗⲏⲑⲱⲥ <text:line-break/><text:span text:style-name="T1"> </text:span><text:span text:style-name="T2">(67/14) </text:span> ⲁⲧⲣⲟⲩϫⲡⲟⲟⲩ ⲛ̅ⲕⲉⲥⲟⲡ’ ϩⲓⲧⲛ̅ ⲧϩⲓⲕⲱⲛ ⲁϣ <text:line-break/><text:span text:style-name="T1"> </text:span><text:span text:style-name="T2">(67/15) </text:span> ⲧⲉ ⲧⲁⲛⲁⲥⲧⲁⲥⲓⲥ ⲁⲩⲱ ⲑⲓⲕⲱⲛ ϩⲓⲧⲛ̅ ⲑⲓⲕⲱⲛ <text:line-break/><text:span text:style-name="T1"> </text:span><text:span text:style-name="T2">(67/16) </text:span> ϣϣⲉ ⲉⲧⲣⲉⲥⲧⲱⲟⲩⲛ ⲡⲛⲩⲙⲫⲱⲛ ⲙⲛ̅ ⲑⲓ‐ <text:line-break/><text:span text:style-name="T1"> </text:span><text:span text:style-name="T2">(67/17) </text:span> ⲕⲱⲛ ϩⲓⲧⲛ̅ ⲑⲓⲕⲱⲛ ϣϣⲉ ⲉⲧⲣⲟⲩⲉⲓ ⲉϩⲟⲩⲛ <text:line-break/><text:span text:style-name="T1"> </text:span><text:span text:style-name="T2">(67/18) </text:span> ⲉⲧⲁⲗⲏⲑⲉⲓⲁ ⲉⲧⲉ ⲧⲁⲉⲓ ⲧⲉ ⲧ’ⲁⲡⲟⲕⲁⲧⲁⲥⲧⲁⲥⲓⲥ <text:line-break/><text:span text:style-name="T1"> </text:span><text:span text:style-name="T2">(67/19) </text:span> ϣϣⲉ ⲁⲛⲉⲧϫⲡⲟ ⲁⲛ ⲙ̅ⲙⲁⲧⲉ ⲙ̅ⲡⲣⲁⲛ’ ⲙ̅‐ <text:line-break/><text:span text:style-name="T1"> </text:span><text:span text:style-name="T2">(67/20) </text:span> ⲡⲉⲓⲱⲧ’ ⲙⲛ̅ ⲡϣⲏⲣⲉ ⲙⲛ̅ ⲡⲡⲛ̅ⲁ̅ ⲉⲧⲟⲩⲁⲁⲃ <text:line-break/><text:span text:style-name="T1"> </text:span><text:span text:style-name="T2">(67/21) </text:span> ⲁⲗⲗⲁ ⲁ〈ⲛⲉⲛⲧⲁ〉ⲩϫⲡⲟⲟⲩ † ⲛⲁⲕ ϩⲱⲟⲩ ⲉⲧⲙ̅ ⲟⲩⲁ ϫⲡⲟ̣‐ <text:line-break/><text:soft-page-break/><text:span text:style-name="T1"> </text:span><text:span text:style-name="T2">(67/22) </text:span> ⲟⲩ ⲛⲁϥ’ ⲡⲕⲉⲣⲁⲛ’ ⲥⲉⲛⲁϥⲓⲧϥ’ ⲛ̅ⲧⲟⲟⲧϥ’ <text:line-break/><text:span text:style-name="T1"> </text:span><text:span text:style-name="T2">(67/23) </text:span> ⲟⲩⲁ ⲇⲉ ϫⲓ ⲙ̅ⲙⲟⲟⲩ ϩⲙ̅ ⲡⲭ̣ⲣⲓⲥⲙⲁ ⲙ̅ⲡⲥⲟ.[.] <text:line-break/><text:span text:style-name="T1"> </text:span><text:span text:style-name="T2">(67/24) </text:span> ⲛ̅ⲧⲇⲩⲛⲁⲙⲓⲥ’ ⲙ̅ⲡⲥx̣[ⲟ]ⲥ̣ ⲧⲁ̣[ⲉ]ⲓ̣ ⲛⲉ ⲛⲁⲡⲟⲥⲧⲟ‐ <text:line-break/><text:span text:style-name="T1"> </text:span><text:span text:style-name="T2">(67/25) </text:span> ⲗⲟⲥ ⲙⲟⲩⲧⲉ ⲉⲣⲟⲥ ϫⲉ̣ [ⲧⲟ]ⲩⲛ̣ⲁ̣ⲙ ⲙⲛ̅ ⲧⲉϩⲃⲟⲩⲣ <text:line-break/><text:span text:style-name="T1"> </text:span><text:span text:style-name="T2">(67/26) </text:span> ⲡⲁⲉⲓ ⲅⲁⲣ’ ⲟⲩⲕⲉⲧⲓ ⲟⲩ[ⲭⲣⲏ]ⲥ̣ⲧ̣[ⲓ]ⲁⲛⲟⲥ ⲡⲉ ⲁⲗⲗⲁ <text:line-break/><text:span text:style-name="T1"> </text:span><text:span text:style-name="T2">(67/27) </text:span> ⲟⲩⲭⲣ̅ⲥ̅ ⲡⲉ §ⲁⲡϫⲟⲉⲓ̣[ⲥ ⲣ̅] ϩⲱⲃ̣’ ⲛⲓⲙ’ ϩⲛ̅ⲛⲟⲩ‐ <text:line-break/><text:span text:style-name="T1"> </text:span><text:span text:style-name="T2">(67/28) </text:span> ⲙⲩⲥⲧⲏⲣⲓⲟⲛ ⲟⲩⲃⲁ[ⲡ]ⲧⲓⲥⲙⲁ ⲙⲛ̅ ⲟⲩⲭⲣⲓⲥ‐ <text:line-break/><text:span text:style-name="T1"> </text:span><text:span text:style-name="T2">(67/29) </text:span> ⲙⲁ ⲙⲛ̅ⲛⲟⲩⲉⲩⲭⲁⲣ[ⲓⲥⲧ]ⲓ̣ⲁ̣ ⲙⲛ̣̅ⲛⲟⲩⲥⲱⲧⲉ <text:line-break/><text:span text:style-name="T1"> </text:span><text:span text:style-name="T2">(67/30) </text:span> ⲙⲛ̅ⲛⲟⲩⲛⲩⲙ’ⲫⲱⲛ §[.....]ⲉ̣ⲓ̣ ⲡ̣[ⲉϫ]ⲁ̣ϥ’ <text:line-break/><text:span text:style-name="T1"> </text:span><text:span text:style-name="T2">(67/31) </text:span> ϫⲉ ⲁⲉⲓ ⲉⲧⲣⲁⲉⲓⲣ̣ⲉ̣ [ⲛ̅ⲛⲁ ⲡⲥⲁ ⲙⲡⲓ]ⲧ̣ⲛ̅ ⲛ̅‐ <text:line-break/><text:span text:style-name="T1"> </text:span><text:span text:style-name="T2">(67/32) </text:span> ⲑⲉ ⲛ̅ⲛⲁ ⲡⲥⲁ ⲛ̣[ⲧⲡⲉ ⲁⲩⲱ ⲛⲁ ⲡⲥⲁ ⲛ]ⲃ̣ⲟⲗ <text:line-break/><text:span text:style-name="T1"> </text:span><text:span text:style-name="T2">(67/33) </text:span> ⲛ̅ⲑⲉ ⲛ̅ⲛⲁ ⲡⲥ̣[ⲁ ⲛϩⲟⲩⲛ ⲁⲩⲱ ⲉⲧⲣⲁϩⲟⲧ]‐ <text:line-break/><text:span text:style-name="T1"> </text:span><text:span text:style-name="T2">(67/34) </text:span> ⲣⲟⲩ ⲙ̅ⲡⲙⲁ ⲉⲧⲙ̣̅[............ ⲛⲉ]‐ <text:line-break/><text:span text:style-name="T1"> </text:span><text:span text:style-name="T2">(67/35) </text:span> ⲉⲓⲙⲁ ϩⲓⲧⲛ̅ ϩⲛ̅ⲧⲩ[ⲡⲟⲥ ..........] <text:line-break/><text:span text:style-name="T1"> </text:span><text:span text:style-name="T2">(67/36) </text:span> ⲛⲉⲧϫⲱ ⲙ̅ⲙⲟⲥ ϫⲉ̣ [ⲟⲩⲛ̅ ⲟⲩⲣⲙ̅ⲙ̅ⲡⲉ ⲁⲩⲱ] <text:line-break/><text:span text:style-name="T1"> </text:span><text:span text:style-name="T2">(67/37) </text:span> ⲟⲩⲛ̅ ⲟⲩⲉⲓ ⲙ̅ⲡⲥⲁ ⲛⲧⲡⲉ̣ [ⲙ̅ⲙⲟϥ ⲥⲉⲣ̅ⲡⲗⲁ]‐ <text:line-break/><text:span text:style-name="T1"> </text:span><text:span text:style-name="T2">(67/38) </text:span> ⲛⲁⲥⲑⲉ ⲡⲉⲧⲟⲩⲟⲛⲉϩ ⲅ̣[ⲁⲣ ⲉⲃⲟⲗ ⲡⲣⲙ̅ⲙ̅]‐ <text:line-break/><text:span text:style-name="T1"> </text:span><text:span text:style-name="T2">(68/1) </text:span> ⲡ̣ⲉ ⲉⲧⲙ̅ⲙⲁⲩ ⲡ[ⲉ]ⲧ̣ⲟ̣[ⲩ]ⲙⲟⲩⲧⲉ ⲉⲣⲟϥ’ ϫⲉ <text:line-break/><text:span text:style-name="T1"> </text:span><text:span text:style-name="T2">(68/2) </text:span> ⲡⲉⲧⲙ̅ⲡⲥⲁ ⲛⲡ̣ⲓ̣ⲧⲛ̅ ⲁⲩⲱ ⲡⲉⲧⲉ ⲡⲉⲑⲏⲡ’ <text:line-break/><text:span text:style-name="T1"> </text:span><text:span text:style-name="T2">(68/3) </text:span> ϣⲟⲟⲡ’ ⲛⲁϥ ⲡⲉⲧⲙ̅ⲙⲁⲩ ⲡⲉ ⲉⲧⲛ̅ⲧⲡⲉ ⲙ̅‐ <text:line-break/><text:span text:style-name="T1"> </text:span><text:span text:style-name="T2">(68/4) </text:span> ⲙⲟϥ’ ⲛⲁⲛⲟⲩⲥ ⲅⲁⲣ ⲛ̅ⲥⲉϫⲟⲟⲥ ϫⲉ ⲡⲥⲁ ⲛ‐ <text:line-break/><text:span text:style-name="T1"> </text:span><text:span text:style-name="T2">(68/5) </text:span> ϩⲟⲩⲛ ⲁⲩⲱ ⲡⲉⲧⲙ̅ⲡⲥⲁ ⲛⲃⲟⲗ’ ⲙⲛ̅ ⲡⲉⲧⲛ̅‐ <text:line-break/><text:span text:style-name="T1"> </text:span><text:span text:style-name="T2">(68/6) </text:span> ⲡⲥⲁ ⲛⲃⲟⲗ ⲙ̅ⲡⲥⲁ ⲛⲃⲟⲗ’ ⲉⲧⲃⲉ ⲡⲁⲓ̈ ⲁⲡϫⲟ‐ <text:line-break/><text:span text:style-name="T1"> </text:span><text:span text:style-name="T2">(68/7) </text:span> ⲉⲓⲥ ⲙⲟⲩⲧⲉ ⲁⲡⲧⲁⲕⲟ ϫⲉ ⲡⲕⲁⲕⲉ ⲉⲧϩⲓ ⲡⲥⲁ ⲛ‐ <text:line-break/><text:span text:style-name="T1"> </text:span><text:span text:style-name="T2">(68/8) </text:span> ⲃⲟⲗ’ ⲙⲛ̅ ϭⲉ ϣⲟⲟⲡ’ ⲙ̅ⲡⲉϥⲃⲁⲗ’ ⲡⲉϫⲁϥ’ <text:line-break/><text:span text:style-name="T1"> </text:span><text:span text:style-name="T2">(68/9) </text:span> ϫⲉ ⲡⲁⲉⲓⲱⲧ’ ⲉⲧϩⲙ̅ ⲡⲉⲑⲏⲡ’ ⲡⲉϫⲁϥ ϫⲉ <text:line-break/><text:span text:style-name="T1"> </text:span><text:span text:style-name="T2">(68/10) </text:span> ⲃⲱⲕ’ ⲉϩⲟⲩⲛ’ ⲉⲡⲉⲕ’ⲧⲁⲙⲉⲓⲟⲛ ⲛ̅ⲅϣⲧⲁⲙ’ <text:line-break/><text:span text:style-name="T1"> </text:span><text:span text:style-name="T2">(68/11) </text:span> ⲙ̅ⲡⲉⲕ’ⲣⲟ ⲉⲣⲱⲕ’ ⲛ̅ⲅϣⲗⲏⲗ’ ⲁⲡⲉⲕ’ⲉⲓⲱⲧ’ <text:line-break/><text:span text:style-name="T1"> </text:span><text:span text:style-name="T2">(68/12) </text:span> ⲉⲧϩⲙ̅ ⲡⲉⲑⲏⲡ’ ⲉⲧⲉ ⲡⲁⲉⲓ ⲡⲉ ⲡⲉⲧϩⲓ ⲥⲁ ⲛ‐ <text:line-break/><text:span text:style-name="T1"> </text:span><text:span text:style-name="T2">(68/13) </text:span> ϩⲟⲩⲛ’ ⲙ̅ⲙⲟⲟⲩ ⲧⲏⲣⲟⲩ ⲡⲉⲧϩⲓ ⲥⲁ ⲛϩⲟⲩⲛ’ <text:line-break/><text:span text:style-name="T1"> </text:span><text:span text:style-name="T2">(68/14) </text:span> ⲇⲉ ⲙ̅ⲙⲟⲟⲩ ⲧⲏⲣⲟⲩ ⲡⲉ ⲡⲡⲗⲏⲣⲱⲙⲁ ⲙ̅‐ <text:line-break/><text:span text:style-name="T1"> </text:span><text:span text:style-name="T2">(68/15) </text:span> ⲙⲛ̅ⲛ̅ⲥⲱϥ’ ⲙⲛ̅ ϭⲉ ⲙ̅ⲡⲉϥ’ⲥⲁ ⲛϩⲟⲩⲛ ⲡⲁ‐ <text:line-break/><text:span text:style-name="T1"> </text:span><text:span text:style-name="T2">(68/16) </text:span> ⲉⲓ ⲡⲉ ⲉⲧⲟⲩϣⲁϫⲉ ⲉⲣⲟϥ’ ϫⲉ ⲡⲉⲧⲙ̅ⲡⲥⲁ ⲛ‐ <text:line-break/><text:span text:style-name="T1"> </text:span><text:span text:style-name="T2">(68/17) </text:span> ⲧⲡⲉ ⲙ̅ⲙⲟⲟⲩ ϩⲁ ⲧⲉϩⲏ ⲙ̅ⲡⲉⲭ̅ⲥ̅ ⲁϩⲟⲉⲓⲛⲉ <text:line-break/><text:span text:style-name="T1"> </text:span><text:span text:style-name="T2">(68/18) </text:span> ⲉⲓ ⲉⲃⲟⲗ’ ⲉⲃⲟⲗ ⲧⲱⲛ’ ⲟⲩⲕⲉⲧⲓ ⲙ̅ⲡⲟⲩϣ’‐ <text:line-break/><text:span text:style-name="T1"> </text:span><text:span text:style-name="T2">(68/19) </text:span> ⲃⲱⲕ’ ⲉϩⲟⲩⲛ ⲁⲩⲱ ⲁⲩⲃⲱⲕ’ ⲉⲧⲱⲛ ⲟⲩⲕⲉⲧⲓ <text:line-break/><text:span text:style-name="T1"> </text:span><text:span text:style-name="T2">(68/20) </text:span> ⲙ̅ⲡⲟⲩϣⲓ ⲉⲃⲟⲗ ⲁϥⲉⲓ ⲇⲉ ⲛ̅ϭⲓ ⲡⲉⲭⲥ̅ ⲛⲉⲛ‐ <text:line-break/><text:span text:style-name="T1"> </text:span><text:span text:style-name="T2">(68/21) </text:span> ⲧⲁϩⲃⲱⲕ’ ⲉϩⲟ̣ⲩⲛ’ ⲁϥⲛ̅ⲧⲟⲩ ⲉⲃⲟⲗ ⲁⲩⲱ ⲛⲉⲛ‐ <text:line-break/><text:span text:style-name="T1"> </text:span><text:span text:style-name="T2">(68/22) </text:span> ⲧⲁϩⲃⲱⲕ’ ⲉⲃⲟ̣ⲗ̣’ ⲁϥⲛ̅ⲧⲟⲩ ⲉϩⲟⲩⲛ§ ⲛ̅ϩⲟⲟⲩ’ <text:line-break/><text:span text:style-name="T1"> </text:span><text:span text:style-name="T2">(68/23) </text:span> ⲛⲉⲣⲉ ⲉⲩϩⲁ [ϩ]ⲛ̣̅ ⲁ[ⲇ]ⲁ̣ⲙ’ ⲛⲉ ⲙⲛ̅ ⲙⲟⲩ ϣⲟⲟⲡ’ <text:line-break/><text:span text:style-name="T1"> </text:span><text:span text:style-name="T2">(68/24) </text:span> ⲛ̅ⲧⲁⲣⲉⲥⲡⲱ̣ⲣϫ [ⲉⲣ]ⲟϥ’ ⲁⲡⲙⲟⲩ ϣⲱⲡⲉ ⲡⲁ‐ <text:line-break/><text:span text:style-name="T1"> </text:span><text:span text:style-name="T2">(68/25) </text:span> ⲗⲓⲛ ⲉϥϣⲁⲃ̣ⲱ̣[ⲕ ⲉϩ]ⲟ̣ⲩⲛ ⲛ̅ϥϫⲓⲧϥ’ ⲉⲣⲟϥ ⲙⲛ̅ <text:line-break/><text:span text:style-name="T1"> </text:span><text:span text:style-name="T2">(68/26) </text:span> ⲙⲟⲩ ⲛⲁϣⲱⲡⲉ̣ §[ⲡ]ⲁ̣ⲛⲟⲩ̣ⲧⲉ ⲡⲁⲛⲟⲩⲧⲉ ⲉ‐ <text:line-break/><text:span text:style-name="T1"> </text:span><text:span text:style-name="T2">(68/27) </text:span> ⲧⲃ̣ⲉ ⲟⲩ ⲡϫⲟⲉⲓⲥ [ⲁ]ⲕ’ⲕⲁⲁⲧ’ ⲛ̅ⲥⲱⲕ’ ⲛ̅ⲧⲁϥϫⲉ <text:line-break/><text:span text:style-name="T1"> </text:span><text:span text:style-name="T2">(68/28) </text:span> ⲛⲁⲉⲓ ϩⲓ ⲡⲥxⲟⲥ [ⲛⲉ] ⲁϥⲡⲱⲣϫ’ ⲅⲁⲣ’ ⲙ̅ⲡⲙⲁ <text:line-break/><text:span text:style-name="T1"> </text:span><text:span text:style-name="T2">(68/29) </text:span> ⲉⲧ[ⲙ‐]ⲙ̣ⲁ̣ⲩ̣ §[.]..[..] ⲛ̅ⲧⲁ̣ⲩϫⲡⲟϥ’ ⲉⲃⲟⲗ ϩⲙ̅ <text:line-break/><text:span text:style-name="T1"> </text:span><text:span text:style-name="T2">(68/30) </text:span> ⲡⲉⲧⲧ̣[.......ⲉ]ⲃ̣ⲟ̣ⲗ ϩⲓⲧⲙ̅ ⲡⲛⲟⲩⲧⲉ <text:line-break/><text:soft-page-break/><text:span text:style-name="T1"> </text:span><text:span text:style-name="T2">(68/31) </text:span> §ⲁⲡ[..........ⲉⲃ]ⲟ̣ⲗ ϩⲛ̅ ⲛⲉⲧⲙⲟⲟⲩⲧ’ <text:line-break/><text:span text:style-name="T1"> </text:span><text:span text:style-name="T2">(68/32) </text:span> [..............ϣ]ⲟⲟⲡ’ ⲁⲗⲗⲁ ⲛⲉ‐ <text:line-break/><text:span text:style-name="T1"> </text:span><text:span text:style-name="T2">(68/33) </text:span> [..............] ⲉϥⲟ ⲛ̅ⲧⲉⲗⲉⲓⲟⲛ <text:line-break/><text:span text:style-name="T1"> </text:span><text:span text:style-name="T2">(68/34) </text:span> [.............] ⲛ̅ⲥⲁⲣⲝ ⲁⲗⲗⲁ ⲧⲉⲉⲓ <text:line-break/><text:span text:style-name="T1"> </text:span><text:span text:style-name="T2">(68/35) </text:span> [.........ⲟⲩⲥ]ⲁ̣ⲣⲝ ⲧⲉ ⲛ̅ⲁⲗⲏⲑⲉⲓⲛⲏ <text:line-break/><text:span text:style-name="T1"> </text:span><text:span text:style-name="T2">(68/36) </text:span> [........]ⲉ̣ ⲟⲩⲁⲗⲏⲑⲉⲓⲛⲏ ⲁⲛ ⲧⲉ ⲁⲗ‐ <text:line-break/><text:span text:style-name="T1"> </text:span><text:span text:style-name="T2">(68/37) </text:span> [ⲗⲁ.......] ⲛ̅ϩⲓⲕⲱⲛ ⲛ̅ⲧⲁⲗⲏⲑⲉⲓⲛⲏ <text:line-break/><text:span text:style-name="T1"> </text:span><text:span text:style-name="T2">(69/1) </text:span> §ⲙⲁⲣⲉ ⲡⲁⲥⲧⲟⲥ ϣⲱ̣ⲡ̣ⲉ ⲛ̣̅ⲛ̅ⲑⲏ̣ⲣⲓⲟⲛ ⲟⲩ̣‐ <text:line-break/><text:span text:style-name="T1"> </text:span><text:span text:style-name="T2">(69/2) </text:span> ⲧⲉ ⲙⲁϥϣⲱⲡⲉ ⲛ̅ⲛ̅ϩⲙ̅ϩ̣̅̅ⲁ̣̅̅ⲗ̣̅̅ ⲟⲩⲧⲉ ⲛ̅ⲥϩⲓⲙⲉ <text:line-break/><text:span text:style-name="T1"> </text:span><text:span text:style-name="T2">(69/3) </text:span> ⲉϥϫⲟϩⲙ ⲁⲗⲗⲁ ϣⲁϥϣⲱⲡⲉ̣ ⲛ̅ϩⲛ̅ⲣⲱⲙⲉ <text:line-break/><text:span text:style-name="T1"> </text:span><text:span text:style-name="T2">(69/4) </text:span> ⲛ̅ⲉⲗⲉⲩⲑⲉⲣⲟⲥ ⲙⲛ̅ ϩⲛ̅ⲡⲁⲣⲑⲉⲛⲟⲥ §ⲉⲃⲟⲗ <text:line-break/><text:span text:style-name="T1"> </text:span><text:span text:style-name="T2">(69/5) </text:span> ϩⲓⲧⲙ̅ ⲡ̅ⲛ̅ⲁ̅ ⲉⲧⲟⲩⲁⲁⲃ ⲥⲉϫⲡⲟ ⲙⲉⲛ ⲙ̅ⲙⲟⲛ <text:line-break/><text:span text:style-name="T1"> </text:span><text:span text:style-name="T2">(69/6) </text:span> ⲛ̅ⲕⲉⲥⲟⲡ’ ⲥⲉϫⲡⲟ ⲇⲉ ⲙ̅ⲙⲟⲛ ϩⲓⲧⲛ̅ ⲡⲉ‐ <text:line-break/><text:span text:style-name="T1"> </text:span><text:span text:style-name="T2">(69/7) </text:span> ⲭⲥ̅ ϩⲙ̅ ⲡⲥⲛⲁⲩ ⲥⲉⲧⲱϩⲥ ⲙ̅ⲙⲟⲛ ϩⲓⲧⲙ̅ ⲡ’‐ <text:line-break/><text:span text:style-name="T1"> </text:span><text:span text:style-name="T2">(69/8) </text:span> ⲡⲛ̅ⲁ̅ ⲛ̅ⲧⲁⲣⲟⲩϫⲡⲟⲛ ⲁⲩϩⲟⲧⲣⲛ̅ ⲙⲛ̅ ⲗⲁⲁⲩ <text:line-break/><text:span text:style-name="T1"> </text:span><text:span text:style-name="T2">(69/9) </text:span> ⲛⲁϣⲛⲁⲩ ⲉⲣⲟϥ’ ⲟⲩⲧⲉ ϩⲙ̅ ⲙⲟⲟⲩ ⲟⲩⲧⲉ ϩⲛ̅ <text:line-break/><text:span text:style-name="T1"> </text:span><text:span text:style-name="T2">(69/10) </text:span> ⲉⲓⲁⲗ’ ⲭⲱⲣⲓⲥ ⲟⲩⲟⲉⲓⲛ ⲟⲩⲧⲉ ⲡⲁⲗⲓⲛ ⲕⲛⲁϣ‐ <text:line-break/><text:span text:style-name="T1"> </text:span><text:span text:style-name="T2">(69/11) </text:span> ⲛⲁⲩ ⲁⲛ ϩⲛ̅ ⲟⲩⲟⲉⲓⲛ ⲭⲱⲣⲓⲥ ⲙⲟⲟⲩ ϩⲓⲁⲗ <text:line-break/><text:span text:style-name="T1"> </text:span><text:span text:style-name="T2">(69/12) </text:span> ⲇⲓⲁ ⲧⲟⲩⲧⲟ ϣϣⲉ ⲁⲣ̅ⲃⲁⲡⲧⲓⲍⲉ ϩⲙ̅ ⲡⲥⲛⲁⲩ <text:line-break/><text:span text:style-name="T1"> </text:span><text:span text:style-name="T2">(69/13) </text:span> ϩⲙ̅ ⲡⲟⲩⲟⲉⲓⲛ’ ⲙⲛ̅ ⲡⲙⲟⲟⲩ ⲡⲟⲩⲟⲉⲓⲛ ⲇⲉ <text:line-break/><text:span text:style-name="T1"> </text:span><text:span text:style-name="T2">(69/14) </text:span> ⲡⲉ ⲡⲭⲣⲓⲥⲙⲁ §ⲛⲉⲩⲛ̅ ϣⲟⲙⲧ’ ⲛ̅ⲏⲉⲓ ⲙ̅ⲙⲁ <text:line-break/><text:span text:style-name="T1"> </text:span><text:span text:style-name="T2">(69/15) </text:span> ⲛ̅ϯⲡⲣⲟⲥⲫⲟⲣⲁ ϩⲛ̅ ⲑⲓⲉⲣⲟⲥⲟⲗⲩⲙⲁ ⲡⲟⲩ‐ <text:line-break/><text:span text:style-name="T1"> </text:span><text:span text:style-name="T2">(69/16) </text:span> ⲁ’ ⲉϥⲟⲩⲉⲛ ⲉⲡⲁⲙⲛⲧⲉ ⲉⲩⲙⲟⲩⲧⲉ ⲉⲣⲟϥ’ <text:line-break/><text:span text:style-name="T1"> </text:span><text:span text:style-name="T2">(69/17) </text:span> ϫⲉ ⲡⲉⲧⲟⲩⲁⲁⲃ ⲡⲕⲉⲟⲩⲁ ⲉϥⲟⲩⲏⲛ’ ⲉⲡⲥⲁ‐ <text:line-break/><text:span text:style-name="T1"> </text:span><text:span text:style-name="T2">(69/18) </text:span> ⲣⲏⲥ ⲉⲩⲙⲟⲩⲧⲉ ⲉⲣⲟϥ ϫⲉ ⲡⲉⲧⲟⲩⲁⲁⲃ ⲙ̅‐ <text:line-break/><text:span text:style-name="T1"> </text:span><text:span text:style-name="T2">(69/19) </text:span> ⲡⲉⲧⲟⲩⲁⲁⲃ ⲡⲙⲁϩϣⲟⲙⲧ’ ⲉϥ’ⲟⲩⲏⲛ ⲁ‐ <text:line-break/><text:span text:style-name="T1"> </text:span><text:span text:style-name="T2">(69/20) </text:span> ⲡⲁⲉⲓⲃⲧⲉ ⲉⲩⲙⲟⲩⲧⲉ ⲉⲣⲟϥ ϫⲉ ⲡⲉⲧⲟⲩⲁⲁⲃ <text:line-break/><text:span text:style-name="T1"> </text:span><text:span text:style-name="T2">(69/21) </text:span> ⲛ̅ⲛⲉⲧⲟⲩⲁⲁⲃ ⲡⲙⲁ ⲉϣⲁ̣ⲣ̣ⲉ ⲡⲁⲣⲭⲓⲉⲣⲉⲩ[ⲥ] <text:line-break/><text:span text:style-name="T1"> </text:span><text:span text:style-name="T2">(69/22) </text:span> ⲃⲱⲕ’ ⲉϩⲟⲩⲛ ⲉⲙⲁⲩ’ ⲟⲩⲁ[ⲁ]ϥ̣ ⲡⲃⲁⲡⲧⲓⲥⲙⲁ <text:line-break/><text:span text:style-name="T1"> </text:span><text:span text:style-name="T2">(69/23) </text:span> ⲡⲉ ⲡⲏⲉⲓ ⲉⲧⲟⲩⲁⲁⲃ [ⲡ]ⲥ̣ⲱ̣[ⲧ]ⲉ ⲡⲉⲧⲟⲩⲁⲁⲃ <text:line-break/><text:span text:style-name="T1"> </text:span><text:span text:style-name="T2">(69/24) </text:span> ⲙ̅ⲡⲉⲧⲟⲩⲁⲁⲃ ⲡⲉⲧ[ⲟⲩⲁ]ⲁⲃ̣ ⲛ̅ⲛⲉⲧⲟⲩⲁⲁⲃ’ <text:line-break/><text:span text:style-name="T1"> </text:span><text:span text:style-name="T2">(69/25) </text:span> ⲡⲉ ⲡⲛⲩⲙⲫⲱⲛ ⲡ[ⲃⲁⲡⲧⲓ]ⲥ̣ⲙⲁ ⲟⲩⲛ̅ⲧⲁϥ’ <text:line-break/><text:span text:style-name="T1"> </text:span><text:span text:style-name="T2">(69/26) </text:span> ⲙ̅ⲙⲁⲩ ⲛ̅ⲧⲁⲛⲁⲥⲧⲁⲥ̣[ⲓⲥ ⲙⲛ̅ ⲡ]ⲥⲱⲧⲉ ⲉⲡⲥⲱ̣‐ <text:line-break/><text:span text:style-name="T1"> </text:span><text:span text:style-name="T2">(69/27) </text:span> ⲧⲉ ϩⲙ̅ ⲡⲛⲩⲙ’ⲫⲱⲛ [ⲉⲡⲛ]ⲩ̣ⲙ’ⲫⲱⲛ ⲇⲉ <text:line-break/><text:span text:style-name="T1"> </text:span><text:span text:style-name="T2">(69/28) </text:span> ϩⲙ̅ ⲡⲉⲧϫⲟⲥⲉ ⲉⲣⲟ[....]ⲛ̣̅[..]ⲟⲟ.. <text:line-break/><text:span text:style-name="T1"> </text:span><text:span text:style-name="T2">(69/29) </text:span> ⲕⲛⲁϩⲉ ⲁⲛ’ ⲉⲧⲉ̣ϥ[.....]ⲧ̣ⲱ̣ⲡ̣ [....] <text:line-break/><text:span text:style-name="T1"> </text:span><text:span text:style-name="T2">(69/30) </text:span> ⲛⲉ ⲛⲉⲧϣⲗⲏⲗ [..............] <text:line-break/><text:span text:style-name="T1"> </text:span><text:span text:style-name="T2">(69/31) </text:span> ⲑⲓⲉⲣⲟⲥⲟⲗⲩⲙⲁ̣ [..........ⲑⲓⲉⲣⲟ]‐ <text:line-break/><text:span text:style-name="T1"> </text:span><text:span text:style-name="T2">(69/32) </text:span> ⲥⲟⲗⲩⲙⲁ ⲉⲩϣ[........ⲑⲓⲉⲣⲟⲥⲟ]‐ <text:line-break/><text:span text:style-name="T1"> </text:span><text:span text:style-name="T2">(69/33) </text:span> ⲗⲩⲙⲁ ⲉⲩϭⲱϣ[ⲧ .............] <text:line-break/><text:span text:style-name="T1"> </text:span><text:span text:style-name="T2">(69/34) </text:span> ⲛⲁⲉⲓ ⲉⲧⲟⲩⲙⲟⲩ[ⲧⲉ ⲉⲣⲟⲟⲩ ϫⲉ ⲡⲉⲧⲟⲩ]‐ <text:line-break/><text:span text:style-name="T1"> </text:span><text:span text:style-name="T2">(69/35) </text:span> ⲁⲁⲃ ⲛ̅ⲛⲉⲧⲟⲩⲁⲁⲃ [..........ⲡⲕⲁ]‐ <text:line-break/><text:span text:style-name="T1"> </text:span><text:span text:style-name="T2">(69/36) </text:span> ⲧⲁⲡⲉⲧⲁⲥⲙⲁ ⲡⲱϩ ⲕⲉ̣[.........] <text:line-break/><text:span text:style-name="T1"> </text:span><text:span text:style-name="T2">(69/37) </text:span> ⲡⲁⲥⲧⲟⲥ ⲉⲓ ⲙⲏ ⲑⲓⲕⲱⲛ̣ [........ ⲉⲧ]‐ <text:line-break/><text:span text:style-name="T1"> </text:span><text:span text:style-name="T2">(70/1) </text:span> [ⲙ̅ⲡ]ⲥⲁ ⲛⲧⲡ’ⲉ] ⲉⲧ[ⲃ]ⲉ̣ [ⲡ]ⲁ̣ⲉⲓ’ ⲁⲡⲉϥⲕⲁⲧⲁ‐ <text:line-break/><text:span text:style-name="T1"> </text:span><text:span text:style-name="T2">(70/2) </text:span> ⲡⲉⲧⲁⲥⲙⲁ ⲡⲱ̣[ϩ] ϫ̣ⲓⲙ ⲡⲥⲁ ⲛⲧⲡⲉ ϣⲁ <text:line-break/><text:span text:style-name="T1"> </text:span><text:span text:style-name="T2">(70/3) </text:span> ⲡⲥⲁ ⲙⲡⲓⲧⲛ̅ ⲛⲉ ϣϣⲉ ⲅⲁⲣ ⲉϩⲟⲉⲓⲛⲉ <text:line-break/><text:soft-page-break/><text:span text:style-name="T1"> </text:span><text:span text:style-name="T2">(70/4) </text:span> ϫⲓⲙ ⲡⲥⲁ ⲙⲡⲓⲧⲛ̅ ⲛ̅ⲥⲉⲃⲱⲕ’ ⲉⲡⲥⲁ ⲛ’ⲧⲡⲉ <text:line-break/><text:span text:style-name="T1"> </text:span><text:span text:style-name="T2">(70/5) </text:span> §ⲛⲉⲛⲧⲁϩϯ ϩⲓⲱⲟⲩ ⲙ̅ⲡⲧⲉⲗⲉⲓⲟⲛ ⲛ̅ⲟⲩ‐ <text:line-break/><text:span text:style-name="T1"> </text:span><text:span text:style-name="T2">(70/6) </text:span> ⲟⲉⲓⲛ ⲙⲁⲣⲟⲩⲛⲁⲩ ⲉⲣⲟⲟⲩ ⲛ̅ϭⲓ ⲛ̅ⲇⲩⲛⲁ‐ <text:line-break/><text:span text:style-name="T1"> </text:span><text:span text:style-name="T2">(70/7) </text:span> ⲙⲓⲥ ⲁⲩⲱ ⲙⲁⲩϣⲉⲙⲁϩⲧⲉ ⲙ̅ⲙⲟⲟⲩ ⲟⲩ‐ <text:line-break/><text:span text:style-name="T1"> </text:span><text:span text:style-name="T2">(70/8) </text:span> ⲁ ⲇⲉ ⲛⲁϯ ϩⲓⲱⲱϥ’ ⲙ̅ⲡⲓⲟⲩⲟⲉⲓⲛ ϩⲙ̅ <text:line-break/><text:span text:style-name="T1"> </text:span><text:span text:style-name="T2">(70/9) </text:span> ⲡⲙⲩⲥⲧⲏⲣⲓⲟⲛ ϩⲙ̅ ⲡϩⲱⲧⲣ̅ §ⲛⲉ ⲙ’ⲡⲉⲧ’‐ <text:line-break/><text:span text:style-name="T1"> </text:span><text:span text:style-name="T2">(70/10) </text:span> ⲥϩⲓⲙⲉ ⲡⲱⲣϫ ⲉⲫⲟⲟⲩⲧ ⲛⲉⲥⲛⲁⲙⲟⲩ <text:line-break/><text:span text:style-name="T1"> </text:span><text:span text:style-name="T2">(70/11) </text:span> ⲁⲛ ⲡⲉ ⲙⲛ̅ ⲫⲟⲟⲩⲧ’ ⲡⲉϥⲡⲱⲣϫ ⲛ̅ⲧⲁϥ’‐ <text:line-break/><text:span text:style-name="T1"> </text:span><text:span text:style-name="T2">(70/12) </text:span> ϣⲱⲡⲉ ⲛ̅ⲁⲣⲭⲏ ⲙ̅ⲡⲙⲟⲩ ⲇⲓⲁ ⲧⲟⲩⲧⲟ <text:line-break/><text:span text:style-name="T1"> </text:span><text:span text:style-name="T2">(70/13) </text:span> ⲁⲡⲉⲭⲣ̅ⲥ̅ ⲉⲓ ϫⲉⲕⲁⲁⲥ ⲡⲡⲱⲣϫ ⲛ̅ⲧⲁϩ‐ <text:line-break/><text:span text:style-name="T1"> </text:span><text:span text:style-name="T2">(70/14) </text:span> ϣⲱⲡⲉ ϫⲓⲛ’ ϣⲟⲣⲡ’ ⲉϥⲛⲁⲥⲉϩⲱϥ ⲉⲣⲁⲧϥ’ <text:line-break/><text:span text:style-name="T1"> </text:span><text:span text:style-name="T2">(70/15) </text:span> ⲡⲁⲗⲓⲛ’ ⲛ̅ϥϩⲟⲧⲣⲟⲩ ⲙ̅ⲡⲥⲛⲁⲩ ⲁⲩⲱ ⲛⲉⲛ‐ <text:line-break/><text:span text:style-name="T1"> </text:span><text:span text:style-name="T2">(70/16) </text:span> ⲧⲁϩⲙⲟⲩ ϩⲙ̅ ⲡⲡⲱⲣϫ’ ⲉϥⲛⲁϯ ⲛⲁⲩ ⲛ̅ⲛⲟⲩ‐ <text:line-break/><text:span text:style-name="T1"> </text:span><text:span text:style-name="T2">(70/17) </text:span> ⲱⲛϩ ⲛ̅ϥϩⲟⲧⲣⲟⲩ ϣⲁⲣⲉ ⲧⲥϩⲓⲙⲉ ⲇⲉ <text:line-break/><text:span text:style-name="T1"> </text:span><text:span text:style-name="T2">(70/18) </text:span> ϩⲱⲧⲣ̅ ⲁⲡⲉⲥϩⲁⲉⲓ ϩⲣⲁⲓ̈ ϩⲙ ⲡⲡⲁⲥⲧⲟⲥ <text:line-break/><text:span text:style-name="T1"> </text:span><text:span text:style-name="T2">(70/19) </text:span> ⲛⲉⲛⲧⲁϩⲱⲧⲣ̅ ⲇⲉ ϩⲙ̅ ⲡⲡⲁⲥⲧⲟⲥ ⲟⲩⲕⲉ‐ <text:line-break/><text:span text:style-name="T1"> </text:span><text:span text:style-name="T2">(70/20) </text:span> ⲧⲓ ⲥⲉⲛⲁⲡⲱⲣϫ’ ⲇⲓⲁ ⲧⲟⲩⲧⲟ ⲁⲉⲩϩⲁ <text:line-break/><text:span text:style-name="T1"> </text:span><text:span text:style-name="T2">(70/21) </text:span> ⲡⲱⲣϫ’ ⲁⲁⲇⲁⲙ ϫⲉ ⲛ̅ⲧⲁⲥϩⲱⲧⲣ̅ ⲉⲣⲟϥ’ <text:line-break/><text:span text:style-name="T1"> </text:span><text:span text:style-name="T2">(70/22) </text:span> ⲁⲛ ϩⲙ̅ ⲡⲡⲁⲥ̣[ⲧⲟ]ⲥ §ⲧⲯⲩⲭⲏ ⲛ̅ⲁⲇⲁⲙ’ ⲛ̅‐ <text:line-break/><text:span text:style-name="T1"> </text:span><text:span text:style-name="T2">(70/23) </text:span> ⲧⲁⲥϣⲱⲡⲉ ⲉ̣[ⲃ]ⲟⲗ ϩⲛ̅ⲛⲟⲩⲛⲓϥⲉ ⲡⲉⲥ‐ <text:line-break/><text:span text:style-name="T1"> </text:span><text:span text:style-name="T2">(70/24) </text:span> ϩⲱⲧⲣ̅ ⲡⲉ ⲡⲡ̣[ⲛ̅]ⲁ̣̅ ⲡ̣[ⲉ]ⲛ’ⲧⲁⲩⲧⲁⲁϥ ⲛⲁϥ’ <text:line-break/><text:span text:style-name="T1"> </text:span><text:span text:style-name="T2">(70/25) </text:span> ⲧⲉ ⲧⲉϥⲙⲁⲁⲩ̣ ⲁⲩ[ϥⲓ] ⲛ̣̅ⲧⲉϥⲯⲩⲭⲏ ⲁⲩϯ <text:line-break/><text:span text:style-name="T1"> </text:span><text:span text:style-name="T2">(70/26) </text:span> ⲛⲁϥ’ ⲛ̅ⲛⲟⲩ[ⲡⲛ̅ⲁ̅ ⲉ]ⲡⲉⲥⲙⲁ ⲉⲡⲉⲓ ⲛ̅‐ <text:line-break/><text:span text:style-name="T1"> </text:span><text:span text:style-name="T2">(70/27) </text:span> ⲧ̣ⲁⲣⲉϥ’ⲡϩⲱⲧⲣ̣̅ [ⲁϥϫ]ⲱ̣ ⲛ̅ϩⲛ̅ϣⲁϫⲉ ⲉⲩϫⲟ‐ <text:line-break/><text:span text:style-name="T1"> </text:span><text:span text:style-name="T2">(70/28) </text:span> ⲥⲉ’ ⲁⲛⲇⲩⲛⲁ[ⲙⲓⲥ] ⲁ̣ⲩⲣ̅ⲃⲁⲥⲕⲁⲛⲉ ⲉⲣⲟϥ <text:line-break/><text:span text:style-name="T1"> </text:span><text:span text:style-name="T2">(70/29) </text:span> [....]ⲣϫ [....ϩ]ⲱⲧⲣ̅ ⲙ̅ⲡⲛⲉⲩⲙⲁ‐ <text:line-break/><text:span text:style-name="T1"> </text:span><text:span text:style-name="T2">(70/30) </text:span> [ⲧⲓⲕ..]ⲩ̣[.]ⲁ[.....]ⲕⲏ ⲧⲉⲑⲏⲡ’ ⲁⲩ‐ <text:line-break/><text:span text:style-name="T1"> </text:span><text:span text:style-name="T2">(70/31) </text:span> [...........]ⲁ̣ⲉⲓϭⲉ ⲛ̅ϭⲓ ⲡⲉ‐ <text:line-break/><text:span text:style-name="T1"> </text:span><text:span text:style-name="T2">(70/32) </text:span> [............]ⲟ̣ ⲛⲁⲩ ⲟⲩⲁⲁⲩ <text:line-break/><text:span text:style-name="T1"> </text:span><text:span text:style-name="T2">(70/33) </text:span> [........... ⲡ]ⲁ̣ⲥⲧⲟⲥ ϣⲓⲛⲁ <text:line-break/><text:span text:style-name="T1"> </text:span><text:span text:style-name="T2">(70/34) </text:span> [...........].ⲟⲩ §ⲁⲓⲥ̅ ϭⲱⲗⲡ’ <text:line-break/><text:span text:style-name="T1"> </text:span><text:span text:style-name="T2">(70/35) </text:span> [ⲉⲃⲟⲗ.....ⲡⲉⲓⲟ]ⲣⲇⲁⲛⲏⲥ ⲡⲡⲗⲏ‐ <text:line-break/><text:span text:style-name="T1"> </text:span><text:span text:style-name="T2">(70/36) </text:span> [ⲣⲱⲙⲁ ⲛ̅ⲧⲙ̅ⲛ̅ⲧ̅ⲉ]ⲣ̣ⲟ ⲛⲙ̅ⲡⲏⲩⲉ ⲡⲉⲛ‐ <text:line-break/><text:span text:style-name="T1"> </text:span><text:span text:style-name="T2">(70/37) </text:span> [ⲧⲁⲩϫⲡⲟϥ ϩ]ⲁ ⲧⲉϩⲏ ⲙ̅ⲡⲧⲏⲣϥ ⲡⲁ’‐ <text:line-break/><text:span text:style-name="T1"> </text:span><text:span text:style-name="T2">(71/1) </text:span> ⲗⲓⲛ ⲁⲩϫⲡⲟϥ’ ⲡ[ⲉⲛⲧⲁ]ⲩ̣ⲧ̣[ⲟ]ϩ̣ⲥϥ̅ ⲛ̅ϣⲟⲣ̣[ⲡ] <text:line-break/><text:span text:style-name="T1"> </text:span><text:span text:style-name="T2">(71/2) </text:span> ⲡⲁⲗⲓⲛ ⲁⲩⲧⲟϩⲥϥ̅ ⲡ[ⲉⲛ]’ⲧⲁⲩⲥⲟⲧϥ̅ ⲡⲁ‐ <text:line-break/><text:span text:style-name="T1"> </text:span><text:span text:style-name="T2">(71/3) </text:span> ⲗⲓⲛ ⲁϥⲥⲱⲧⲉ §ⲉϣϫⲉ ϣϣⲉ ⲉϫⲱ ⲛ̅ⲟⲩ‐ <text:line-break/><text:span text:style-name="T1"> </text:span><text:span text:style-name="T2">(71/4) </text:span> ⲙⲩⲥⲧⲏⲣⲓⲟⲛ ⲁⲡⲉⲓⲱⲧ’ ⲙ̅ⲡⲧⲏⲣϥ’ ϩⲱⲧⲣ̅ <text:line-break/><text:span text:style-name="T1"> </text:span><text:span text:style-name="T2">(71/5) </text:span> ⲁⲧ’ⲡⲁⲣⲑⲉⲛⲟⲥ ⲛ̅ⲧⲁϩⲉⲓ ⲁⲡⲓⲧⲛ̅ ⲁⲩⲱ <text:line-break/><text:span text:style-name="T1"> </text:span><text:span text:style-name="T2">(71/6) </text:span> ⲁⲩⲕⲱⲧ’ ⲣ̅ ⲟⲩⲟⲉⲓⲛ’ ⲉⲣⲟϥ’ ⲙ̅ⲫⲟⲟⲩ ⲉⲧⲙ̅‐ <text:line-break/><text:span text:style-name="T1"> </text:span><text:span text:style-name="T2">(71/7) </text:span> ⲙⲁⲩ ⲁϥϭⲱⲗⲡ’ ⲉⲃⲟⲗ ⲙ̅ⲡⲛⲟϭ ⲙ̅ⲡⲁⲥⲧⲟⲥ <text:line-break/><text:span text:style-name="T1"> </text:span><text:span text:style-name="T2">(71/8) </text:span> ⲉⲧⲃⲉ ⲡⲁⲉⲓ ⲡⲉϥⲥⲱⲙⲁ ⲛ̅ⲧⲁϥϣⲱⲡⲉ <text:line-break/><text:span text:style-name="T1"> </text:span><text:span text:style-name="T2">(71/9) </text:span> ⲙ̅ⲫⲟⲟⲩ ⲉⲧⲙ̅ⲙⲁⲩ ⲁϥⲉⲓ ⲉⲃⲟⲗ ϩⲙ ⲡⲡⲁ‐ <text:line-break/><text:span text:style-name="T1"> </text:span><text:span text:style-name="T2">(71/10) </text:span> ⲥⲧⲟⲥ ⲛ̅ⲑⲉ ⲙ̅ⲡⲉⲛ’ⲧⲁϩϣⲱⲡⲉ ⲉⲃⲟⲗ <text:line-break/><text:span text:style-name="T1"> </text:span><text:span text:style-name="T2">(71/11) </text:span> ϩⲙ̅ ⲡⲛⲩⲙⲫⲓⲟⲥ ⲙⲛ̅ ⲧⲛⲩⲙⲫⲏ ⲧⲁ’‐ <text:line-break/><text:span text:style-name="T1"> </text:span><text:span text:style-name="T2">(71/12) </text:span> ⲉⲓ ⲧⲉ ⲑⲉ ⲁⲓ̅ⲥ̅ ⲧⲉϩⲟ ⲙ̅ⲡⲧⲏⲣϥ’ ⲉⲣⲁⲧϥ’ <text:line-break/><text:span text:style-name="T1"> </text:span><text:span text:style-name="T2">(71/13) </text:span> ϩⲣⲁⲓ̈ ⲛ̅ϩⲏⲧϥ’ ⲉⲃⲟⲗ ϩⲓⲧⲛ̅ ⲛⲁⲉⲓ ⲁⲩⲱ’ <text:line-break/><text:soft-page-break/><text:span text:style-name="T1"> </text:span><text:span text:style-name="T2">(71/14) </text:span> ϣϣⲉ ⲉⲧⲣⲉ ⲡⲟⲩⲁ ⲡⲟⲩⲁ ⲛⲙ̅ⲙⲁⲑⲏⲧⲏⲥ <text:line-break/><text:span text:style-name="T1"> </text:span><text:span text:style-name="T2">(71/15) </text:span> ⲙⲟⲟϣⲉ ⲉϩⲟⲩⲛ’ ⲉⲧⲉϥ’ⲁⲛⲁⲡⲁⲩⲥⲓⲥ <text:line-break/><text:span text:style-name="T1"> </text:span><text:span text:style-name="T2">(71/16) </text:span> §ⲁⲁⲇⲁⲙ’ ϣⲱⲡⲉ ⲉⲃⲟⲗ ϩⲛ̅ ⲡⲁⲣⲑⲉⲛⲟⲥ <text:line-break/><text:span text:style-name="T1"> </text:span><text:span text:style-name="T2">(71/17) </text:span> ⲥⲛ̅ⲧⲉ ⲉⲃⲟⲗ ϩⲙ̅ ⲡⲡ̅ⲛ̅ⲁ̅ ⲁⲩⲱ ⲉⲃⲟⲗ’ <text:line-break/><text:span text:style-name="T1"> </text:span><text:span text:style-name="T2">(71/18) </text:span> ϩⲙ̅ ⲡⲕⲁϩ ⲙ̅ⲡⲁⲣⲑⲉⲛⲟⲥ ⲉⲧⲃⲉ ⲡⲁⲉⲓ <text:line-break/><text:span text:style-name="T1"> </text:span><text:span text:style-name="T2">(71/19) </text:span> ⲁⲩϫⲡⲉ ⲡⲉⲭ̅ⲥ̅ ⲉⲃⲟⲗ ϩⲛ̅ ⲟⲩⲡⲁⲣⲑⲉⲛⲟⲥ <text:line-break/><text:span text:style-name="T1"> </text:span><text:span text:style-name="T2">(71/20) </text:span> ϫⲉⲕⲁⲁⲥ ⲡⲉⲥⲗⲟⲟⲧⲉ ⲛ̅ⲧⲁϩϣⲱⲡⲉ <text:line-break/><text:span text:style-name="T1"> </text:span><text:span text:style-name="T2">(71/21) </text:span> ϩⲛ̅ ⲧⲉϩⲟⲩⲉⲓⲧⲉ ⲉϥⲛⲁ̣[ⲥ]ⲉ̣ϩⲱϥ ⲉⲣⲁⲧϥ’ <text:line-break/><text:span text:style-name="T1"> </text:span><text:span text:style-name="T2">(71/22) </text:span> §ⲟⲩⲛ̅ ϣⲏⲛ’ ⲥⲛⲁⲩ̣ ⲣ̣ⲏ̣ⲧ [ϩ]ⲙ̣̅ ⲡⲡⲁⲣⲁⲇⲓ‐ <text:line-break/><text:span text:style-name="T1"> </text:span><text:span text:style-name="T2">(71/23) </text:span> ⲥⲟⲥ ⲡⲟⲩⲁ ϫⲡⲉ ⲑ̣[ⲏⲣⲓⲟⲛ] ⲡⲟⲩⲁ ϫⲡⲉ <text:line-break/><text:span text:style-name="T1"> </text:span><text:span text:style-name="T2">(71/24) </text:span> ⲣⲱⲙⲉ ⲁⲁⲇⲁⲙ’ ⲟ[ⲩⲱⲙ] ⲉ̣ⲃⲟⲗ ϩⲙ̅ ⲡϣⲏⲛ <text:line-break/><text:span text:style-name="T1"> </text:span><text:span text:style-name="T2">(71/25) </text:span> ⲛ̅ⲧⲁϩϫⲡⲉ ⲑⲏⲣ’ⲓ[ⲟⲛ ⲁϥϣ]ⲱⲡⲉ ⲛ̅ⲑⲏ‐ <text:line-break/><text:span text:style-name="T1"> </text:span><text:span text:style-name="T2">(71/26) </text:span> ⲣⲓⲟⲛ ⲁϥϫⲡⲉ ⲑⲏ[ⲣⲓⲟⲛ ⲉ]ⲧⲃⲉ ⲡⲁⲓ̈ ⲥⲉ‐ <text:line-break/><text:span text:style-name="T1"> </text:span><text:span text:style-name="T2">(71/27) </text:span> ⲣ̅ⲥⲉⲃⲉⲥⲑⲉ ⲁⲛⲑ̣[ⲏⲣⲓⲟⲛ ⲛ̅ϭ]ⲓ̣ ⲛ̅ϣ̣ⲏ̣ⲣ̣ⲉ̣ <text:line-break/><text:span text:style-name="T1"> </text:span><text:span text:style-name="T2">(71/28) </text:span> ⲛ̅ⲁⲇⲁⲙ ⲡϣⲏ[ⲛ ...........] <text:line-break/><text:span text:style-name="T1"> </text:span><text:span text:style-name="T2">(71/29) </text:span> ⲕⲁⲣⲡⲟⲥ ⲡⲉ ⲡ̣[............] <text:line-break/><text:span text:style-name="T1"> </text:span><text:span text:style-name="T2">(71/30) </text:span> ⲡⲁⲉⲓ ⲁⲩⲁϣ̣[ⲁⲉⲓ............] <text:line-break/><text:span text:style-name="T1"> </text:span><text:span text:style-name="T2">(71/31) </text:span> ⲟⲩⲱⲙ’ ⲙ̅ⲡ[..............] <text:line-break/><text:span text:style-name="T1"> </text:span><text:span text:style-name="T2">(71/32) </text:span> ⲕⲁⲣⲡⲟⲥ ⲙ̅ⲡ̣[..............] <text:line-break/><text:span text:style-name="T1"> </text:span><text:span text:style-name="T2">(71/33) </text:span> ϫⲡⲟ ⲛ̅ⲣ̅ⲣⲱⲙⲉ̣ [............] <text:line-break/><text:span text:style-name="T1"> </text:span><text:span text:style-name="T2">(71/34) </text:span> ⲱⲧ’ ⲙ̅ⲡⲣⲱⲙⲉ ⲛ̣̅[...........] <text:line-break/><text:span text:style-name="T1"> </text:span><text:span text:style-name="T2">(71/35) </text:span> ⲡⲛⲟⲩⲧⲉ ⲧⲁⲙⲉⲓⲉ ⲡⲣⲱ̣[ⲙⲉ...ⲣ̅ⲣⲱ] <text:line-break/><text:span text:style-name="T1"> </text:span><text:span text:style-name="T2">(72/1) </text:span> ⲙⲉ ⲧⲁⲙⲉⲓ̣ⲉ̣ ⲡ[ⲛ]ⲟⲩ[ⲧ]ⲉ ⲧⲁⲉⲓ ⲧⲉ ⲑⲉ ϩⲙ̅ ⲡⲕⲟⲥ‐ <text:line-break/><text:span text:style-name="T1"> </text:span><text:span text:style-name="T2">(72/2) </text:span> ⲙⲟⲥ ⲉⲛⲣⲱ̣[ⲙ]ⲉ̣ ⲧⲁⲙⲓⲉ ⲛⲟⲩⲧⲉ ⲁⲩⲱ ⲥⲉⲟⲩ‐ <text:line-break/><text:span text:style-name="T1"> </text:span><text:span text:style-name="T2">(72/3) </text:span> ⲱϣⲧ’ ⲛ̅ⲛⲟ̣ⲩⲧⲁⲙⲓⲟ ⲛⲉ ϣϣⲉ ⲉⲧⲣⲉ ⲛ̅ⲛⲟⲩ‐ <text:line-break/><text:span text:style-name="T1"> </text:span><text:span text:style-name="T2">(72/4) </text:span> ⲧⲉ ⲟⲩⲱϣⲧ’ ⲛ̅ⲣ̅ⲣⲱⲙⲉ §ⲛ̅ⲑⲉ ⲉⲥϣⲟⲟⲡ’ ⲙ̅‐ <text:line-break/><text:span text:style-name="T1"> </text:span><text:span text:style-name="T2">(72/5) </text:span> ⲙⲟⲥ ⲛ̅ϭⲓ ⲧⲁⲗⲏⲑⲉⲓⲁ ⲛ̅ⲛ̅ϩⲃⲏⲩⲉ ⲙ̅ⲡⲣⲱ‐ <text:line-break/><text:span text:style-name="T1"> </text:span><text:span text:style-name="T2">(72/6) </text:span> ⲙⲉ ϣⲁⲩϣⲱⲡⲉ ⲉⲃⲟⲗ ϩⲛ̅ ⲧⲉϥ’ⲇⲩⲛⲁⲙⲓⲥ <text:line-break/><text:span text:style-name="T1"> </text:span><text:span text:style-name="T2">(72/7) </text:span> ⲉⲧⲃⲉ ⲡⲁⲉⲓ ⲥⲉⲙⲟⲩⲧⲉ ⲉⲣⲟⲟⲩ ϫⲉ ⲛ̅ⲇⲩ‐ <text:line-break/><text:span text:style-name="T1"> </text:span><text:span text:style-name="T2">(72/8) </text:span> ⲛⲁⲙⲓⲥ ⲛⲉϥϩⲃⲏⲩⲉ ⲛⲉ ⲛⲉϥ’ϣⲏⲣⲉ ⲛ̅ⲧⲁⲩ‐ <text:line-break/><text:span text:style-name="T1"> </text:span><text:span text:style-name="T2">(72/9) </text:span> ϣⲱⲡⲉ ⲉⲃⲟⲗ ϩⲛ̅ ⲟⲩⲁⲛⲁⲡⲁⲩⲥⲓⲥ ⲉⲧⲃⲉ <text:line-break/><text:span text:style-name="T1"> </text:span><text:span text:style-name="T2">(72/10) </text:span> ⲡⲁⲉⲓ ⲧⲉϥⲇⲩⲛⲁⲙⲓⲥ ⲣ̅ⲡⲟⲗⲓⲧⲉⲩⲉⲥⲑⲉ <text:line-break/><text:span text:style-name="T1"> </text:span><text:span text:style-name="T2">(72/11) </text:span> ϩⲣⲁⲓ̈ ϩⲛ̅ ⲛⲉϥϩⲃⲏⲩⲉ ⲉⲧⲁⲛⲁⲡⲁⲩⲥⲓⲥ ⲇⲉ <text:line-break/><text:span text:style-name="T1"> </text:span><text:span text:style-name="T2">(72/12) </text:span> ⲟⲩⲟⲛϩ ⲉⲃⲟⲗ ϩⲣⲁⲓ̈ ϩⲛ̅ ⲛ̅ϣⲏⲣⲉ ⲁⲩⲱ’ <text:line-break/><text:span text:style-name="T1"> </text:span><text:span text:style-name="T2">(72/13) </text:span> ⲕⲛⲁϩⲉ ⲉⲡⲁⲉⲓ’ ⲉϥϫⲱⲧⲉ ϣⲁ ϩⲁⲓ̈ ⲉⲑⲓⲕⲱⲛ <text:line-break/><text:span text:style-name="T1"> </text:span><text:span text:style-name="T2">(72/14) </text:span> ⲁⲩⲱ ⲡⲁⲉⲓ ⲡⲉ ⲡⲣⲱⲙⲉ ⲛ̅ϩⲓⲕⲟⲛⲓⲕⲟⲥ <text:line-break/><text:span text:style-name="T1"> </text:span><text:span text:style-name="T2">(72/15) </text:span> ⲉϥⲉⲓⲣⲉ ⲛ̅ⲛⲉϥϩⲃⲏⲩⲉ ⲉⲃⲟⲗ ϩⲛ̅ ⲧⲉϥϭⲟⲙ’ <text:line-break/><text:span text:style-name="T1"> </text:span><text:span text:style-name="T2">(72/16) </text:span> ⲉⲃⲟⲗ ⲇⲉ ϩⲛ̅ ⲁⲛⲁⲡⲁⲩⲥⲓⲥ ⲉϥϫⲡⲟ ⲛ̅ⲛⲉϥ’‐ <text:line-break/><text:span text:style-name="T1"> </text:span><text:span text:style-name="T2">(72/17) </text:span> ϣⲏⲣⲉ §ϩⲙ̅ ⲡⲉⲉⲓⲕⲟⲥⲙⲟⲥ ⲛ̅ϩⲙϩ̅ⲁ̅ⲗ̅ ⲣ̅‐ <text:line-break/><text:span text:style-name="T1"> </text:span><text:span text:style-name="T2">(72/18) </text:span> ϩⲩⲡⲏⲣⲉⲧⲉⲓ ⲛ̅ⲉⲗⲉⲩⲑⲉⲣⲟⲥ ϩⲛ̅ ⲧⲙⲛ̅‐ <text:line-break/><text:span text:style-name="T1"> </text:span><text:span text:style-name="T2">(72/19) </text:span> ⲧⲉⲣⲟ ⲛⲙ̅ⲡ̣ⲏⲩⲉ ⲛⲉⲗⲉⲩⲑⲉⲣⲟⲥ ⲛⲁⲣ̅‐ <text:line-break/><text:span text:style-name="T1"> </text:span><text:span text:style-name="T2">(72/20) </text:span> ⲇⲓⲁⲕⲟⲛ[ⲉⲓ] ⲛ̅ⲛ̅ϩⲙ̅ϩ̅ⲁ̅ⲗ̅ ⲛ̅ⲛ̅ϣⲏⲣⲉ ⲙ̅‐ <text:line-break/><text:span text:style-name="T1"> </text:span><text:span text:style-name="T2">(72/21) </text:span> ⲡⲛⲩⲙⲫ[ⲱ]ⲛ̣ ⲛ̣[ⲁ]ⲣ̅ⲇⲓⲁⲕⲟⲛⲉⲓ ⲛ̅ⲛ̅ϣⲏ‐ <text:line-break/><text:span text:style-name="T1"> </text:span><text:span text:style-name="T2">(72/22) </text:span> ⲣⲉ ⲙ̅ⲡⲅⲁ[ⲙⲟⲥ ⲛ̅]ϣⲏⲣⲉ ⲙ̅ⲡⲛⲩⲙ’ⲫⲱⲛ <text:line-break/><text:span text:style-name="T1"> </text:span><text:span text:style-name="T2">(72/23) </text:span> ⲟⲩⲣⲁⲛ ⲟⲩ̣[ⲱⲧ ⲡⲉ]ⲧⲉ ⲟⲩⲛⲧⲁⲩϥ’ ⲧⲁⲛⲁ‐ <text:line-break/><text:span text:style-name="T1"> </text:span><text:span text:style-name="T2">(72/24) </text:span> ⲡⲁⲩⲥⲓⲥ’ ⲉ[ⲩϩⲓ ⲛ]ⲟⲩⲉⲣⲏⲩ ⲥⲉⲣ̅ⲭⲣⲉⲓⲁ ⲁⲛ <text:line-break/><text:span text:style-name="T1"> </text:span><text:span text:style-name="T2">(72/25) </text:span> ⲛ̣̅ϫ̣ⲓ̣ ϩ̣ⲣ̅ⲃ̣[’ ⲉⲩⲛ̅ⲧⲁⲩ] ⲧⲉⲑⲉⲱⲣⲉⲓⲁ ⲙ̅ⲙⲁⲩ <text:line-break/><text:soft-page-break/><text:span text:style-name="T1"> </text:span><text:span text:style-name="T2">(72/26) </text:span> [....]ⲫ̣[.....]ⲑ̣ⲏⲥⲓⲥ ϩⲛ̅ϩⲟⲩⲟ ⲛⲉ <text:line-break/><text:span text:style-name="T1"> </text:span><text:span text:style-name="T2">(72/27) </text:span> [............]ⲥⲓⲁ ϩⲛ̅ ⲛⲉⲧϩⲛ̅ ⲡ’‐ <text:line-break/><text:span text:style-name="T1"> </text:span><text:span text:style-name="T2">(72/28) </text:span> [...........]ⲛ̅ ⲛⲉⲟⲟⲩ ⲛ̅ⲛⲉ‐ <text:line-break/><text:span text:style-name="T1"> </text:span><text:span text:style-name="T2">(72/29) </text:span> [...........]ⲉ̣ ⲙ̅ⲙⲟⲟⲩ ⲁⲛ §ⲛⲉ‐ <text:line-break/><text:span text:style-name="T1"> </text:span><text:span text:style-name="T2">(72/30) </text:span> [..........ⲃ]ⲱⲕ’ ⲉⲡⲓⲧⲛ̅ ⲉⲡⲙⲟ‐ <text:line-break/><text:span text:style-name="T1"> </text:span><text:span text:style-name="T2">(72/31) </text:span> [ⲟⲩ ........] ⲉⲃⲟⲗ’ ⲉϥⲛⲁⲥⲟⲧϥ’ <text:line-break/><text:span text:style-name="T1"> </text:span><text:span text:style-name="T2">(72/32) </text:span> [.........]ⲕ’ ⲉⲃⲟⲗ ⲛ̅ϭⲓ ⲛⲉⲛ’ⲧⲁϩ‐ <text:line-break/><text:span text:style-name="T1"> </text:span><text:span text:style-name="T2">(72/33) </text:span> [......] ϩⲙ̅ ⲡⲉϥⲣⲁⲛ ⲡⲉϫⲁϥ ⲅⲁⲣ <text:line-break/><text:span text:style-name="T1"> </text:span><text:span text:style-name="T2">(72/34) </text:span> [ϫⲉ ⲧⲁⲉⲓ ⲧⲉ ⲑ]ⲉ ⲉⲛⲁϫⲱⲕ’ ⲉⲃⲟⲗ ⲛ̅ⲇⲓⲕ(ⲁⲓ)‐ <text:line-break/><text:span text:style-name="T1"> </text:span><text:span text:style-name="T2">(73/1) </text:span> ⲟⲥⲩⲛⲏ ⲛⲓⲙ’ §ⲛⲉⲧϫ̣ⲱ ⲙ̣̅ⲙⲟⲥ ϫⲉ ⲥⲉⲛⲁ‐ <text:line-break/><text:span text:style-name="T1"> </text:span><text:span text:style-name="T2">(73/2) </text:span> ⲙⲟⲩ ⲛ̅ϣⲟⲣⲡ’ ⲁⲩⲱ ⲥⲉⲛ̣ⲁ̣ⲧ̣ⲱⲟⲩⲛ ⟦ⲛ̅⟧ ⲥⲉ‐ <text:line-break/><text:span text:style-name="T1"> </text:span><text:span text:style-name="T2">(73/3) </text:span> ⲣ̅ⲡⲗⲁⲛⲁⲥⲑⲉ ⲉⲩⲧⲙ̅ϫⲓ ⲛ̅ϣⲟⲣⲡ’ ⲛ̅ⲧⲁⲛⲁ‐ <text:line-break/><text:span text:style-name="T1"> </text:span><text:span text:style-name="T2">(73/4) </text:span> ⲥⲧⲁⲥⲓⲥ ⲉⲩⲟⲛϩ ⲉⲩϣⲁⲙⲟⲩ ⲥⲉⲛⲁϫⲓ ⲗⲁ‐ <text:line-break/><text:span text:style-name="T1"> </text:span><text:span text:style-name="T2">(73/5) </text:span> ⲁⲩ ⲁⲛ ⲧⲁⲉⲓ ⲧⲉ ⲑⲉ ⲟⲛ ⲉⲩϫⲱ ⲙ̅ⲙⲟⲥ ⲉ‐ <text:line-break/><text:span text:style-name="T1"> </text:span><text:span text:style-name="T2">(73/6) </text:span> ⲡⲃⲁⲡⲧⲓⲥⲙⲁ ⲉⲩϫⲱ ⲙ̅ⲙⲟⲥ ϫⲉ ⲟⲩⲛⲟϭ <text:line-break/><text:span text:style-name="T1"> </text:span><text:span text:style-name="T2">(73/7) </text:span> ⲡⲉ ⲡⲃⲁⲡⲧⲓⲥⲙⲁ ϫⲉ ⲉⲩϣⲁϫⲓⲧϥ’ ⲥⲉⲛⲁ‐ <text:line-break/><text:span text:style-name="T1"> </text:span><text:span text:style-name="T2">(73/8) </text:span> ⲱⲛϩ §ⲫⲓⲗⲓⲡⲡⲟⲥ ⲡⲁⲡⲟⲥⲧⲟⲗⲟⲥ ⲡⲉ‐ <text:line-break/><text:span text:style-name="T1"> </text:span><text:span text:style-name="T2">(73/9) </text:span> ϫⲁϥ ϫⲉ ⲓ̈ⲱⲥⲏⲫ’ ⲡϩⲁⲙ’ϣⲉ’ ⲁϥⲧⲱϭⲉ ⲛ̅‐ <text:line-break/><text:span text:style-name="T1"> </text:span><text:span text:style-name="T2">(73/10) </text:span> ⲛⲟⲩⲡⲁⲣⲁⲇⲉⲓⲥⲟⲥ ϫⲉ ⲛⲉϥⲣ̅ⲭⲣⲉⲓⲁ ⲛ̅ϩⲛ̅‐ <text:line-break/><text:span text:style-name="T1"> </text:span><text:span text:style-name="T2">(73/11) </text:span> ϣⲉ ⲉϩⲟⲩⲛ’ ⲉⲧⲉϥ’ⲧⲉⲭⲛⲏ ⲛ̅ⲧⲟϥ ⲡⲉⲛ‐ <text:line-break/><text:span text:style-name="T1"> </text:span><text:span text:style-name="T2">(73/12) </text:span> ⲧⲁϩⲧⲁⲙⲓⲟ ⲙ̅ⲡⲥⲧⲁⲩⲣⲟⲥ ⲉⲃⲟⲗ ϩⲛ̅ ⲛ̅‐ <text:line-break/><text:span text:style-name="T1"> </text:span><text:span text:style-name="T2">(73/13) </text:span> ϣⲏⲛ ⲛ̅ⲧⲁϥ’ⲧⲟϭⲟⲩ ⲁⲩⲱ ⲡⲉϥϭⲣⲟϭ ⲛⲉϥ’‐ <text:line-break/><text:span text:style-name="T1"> </text:span><text:span text:style-name="T2">(73/14) </text:span> ⲟϣⲉ ⲁⲡⲉⲛⲧⲁϥⲧⲟϭϥ’ ⲛⲉ ⲡⲉϥϭⲣⲟϭ ⲡⲉ <text:line-break/><text:span text:style-name="T1"> </text:span><text:span text:style-name="T2">(73/15) </text:span> ⲓⲏ̅ⲥ̅ ⲡⲧⲱϭⲉ ⲇⲉ ⲡⲉ ⲡⲉⲥxⲟⲥ ⲁⲗⲗⲁ ⲡϣⲏⲛ <text:line-break/><text:span text:style-name="T1"> </text:span><text:span text:style-name="T2">(73/16) </text:span> ⲙ̅ⲡⲱⲛϩ ϩⲛ̅ ⲧⲙⲏⲧⲉ ⲙ̅ⲡⲡⲁⲣⲁⲇⲉⲓⲥⲟⲥ <text:line-break/><text:span text:style-name="T1"> </text:span><text:span text:style-name="T2">(73/17) </text:span> ⲁⲩⲱ ⲧⲃⲉⲛ̅ϫⲟⲉⲓⲧ’ ⲛ̅ⲧⲁ ⲡⲉⲭⲣⲉⲓⲥⲙⲁ ϣⲱ‐ <text:line-break/><text:span text:style-name="T1"> </text:span><text:span text:style-name="T2">(73/18) </text:span> ⲡⲉ ⲉⲃⲟⲗ’ ⲛ̅ϩⲏⲧⲥ̅ ⲉⲃⲟⲗ ϩⲓⲧⲟⲟⲧϥ’ ⲁⲧⲁ‐ <text:line-break/><text:span text:style-name="T1"> </text:span><text:span text:style-name="T2">(73/19) </text:span> ⲛⲁⲥⲧⲁⲥⲓⲥ §ⲡⲉⲉⲓⲕⲟⲥⲙⲟⲥ ⲟⲩⲁⲙⲕⲱ‐ <text:line-break/><text:span text:style-name="T1"> </text:span><text:span text:style-name="T2">(73/20) </text:span> ⲱⲥ ⲡⲉ ⲛ̅ⲕⲉ ⲛⲓⲙ’ ⲉⲧⲟⲩⲱⲙ’ ⲙ̅ⲙⲟⲟⲩ <text:line-break/><text:span text:style-name="T1"> </text:span><text:span text:style-name="T2">(73/21) </text:span> ϩⲣⲁⲓ̈ ⲛ̅ϩⲏⲧϥ’ ⲥⲉⲙⲟ̣[ⲩ] ϩⲱⲟⲩ ⲟⲛ’ ⲧⲁⲗⲏⲑⲉⲓ‐ <text:line-break/><text:span text:style-name="T1"> </text:span><text:span text:style-name="T2">(73/22) </text:span> ⲁ ⲟⲩⲁⲙⲱⲛϩ ⲧⲉ ⲉⲧⲃ̣ⲉ̣ ⲡⲁ̣ⲉⲓ ⲙⲛ̅ ⲗⲁⲁⲩ <text:line-break/><text:span text:style-name="T1"> </text:span><text:span text:style-name="T2">(73/23) </text:span> ϩⲛ̅ ⲛⲉⲧ’ⲥⲟⲛϣ ϩⲛ̅ ⲧ̣[ⲙⲉ] ⲛ̣ⲁ̣ⲙⲟⲩ ⲛ̅ⲧⲁ ⲓ̅ⲥ̅ <text:line-break/><text:span text:style-name="T1"> </text:span><text:span text:style-name="T2">(73/24) </text:span> ⲉⲓ ⲉⲃⲟⲗ ϩⲙ̅ ⲡⲙⲁ ⲉ[ⲧⲙ̅]ⲙⲁ̣ⲩ ⲁⲩⲱ ⲁϥⲉⲓ‐ <text:line-break/><text:span text:style-name="T1"> </text:span><text:span text:style-name="T2">(73/25) </text:span> ⲛⲉ ⲛ̅ϩⲛ̅ⲧⲣⲟⲫⲏ ⲉⲃⲟ̣ⲗ ⲙ̅ⲙⲁⲩ ⲁⲩⲱ ⲛⲉ‐ <text:line-break/><text:span text:style-name="T1"> </text:span><text:span text:style-name="T2">(73/26) </text:span> ⲧⲟⲩⲱϣ ⲁϥϯ ⲛⲁⲩ [ⲛ̅ⲟⲩ]ⲱ[ⲛϩ] ϫⲉ̣[ⲕⲁⲁⲥ] <text:line-break/><text:span text:style-name="T1"> </text:span><text:span text:style-name="T2">(73/27) </text:span> ⲛ̅ⲛⲟⲩⲙⲟⲩ §ⲁⲡⲛ[ⲟⲩⲧⲉ .]..ⲉ ⲛ̅ⲟ̣[ⲩⲡⲁⲣⲁ]‐ <text:line-break/><text:span text:style-name="T1"> </text:span><text:span text:style-name="T2">(73/28) </text:span> ⲇⲉⲓⲥⲟⲥ ⲁⲡⲣⲱ̣[ⲙⲉ........ⲡⲁⲣⲁ]‐ <text:line-break/><text:span text:style-name="T1"> </text:span><text:span text:style-name="T2">(73/29) </text:span> ⲇⲉⲓⲥⲟⲥ ⲟⲩⲛ̅ ϩ[.......... ϣⲟ]‐ <text:line-break/><text:span text:style-name="T1"> </text:span><text:span text:style-name="T2">(73/30) </text:span> ⲟⲡ’ ⲙⲛ̅ ϩⲙ̅ⲡ[............] <text:line-break/><text:span text:style-name="T1"> </text:span><text:span text:style-name="T2">(73/31) </text:span> ⲙ̅ⲡⲛⲟⲩⲧⲉ ϩⲙ̣̅ [............] <text:line-break/><text:span text:style-name="T1"> </text:span><text:span text:style-name="T2">(73/32) </text:span> ⲙⲉ ⲛⲉⲧⲛ̅ϩⲏⲧ[ϥ...........ⲉ]‐ <text:line-break/><text:span text:style-name="T1"> </text:span><text:span text:style-name="T2">(73/33) </text:span> ϯ ⲟⲩⲱϣ ⲡⲓⲡⲁⲣⲁⲇ̣[ⲉⲓⲥⲟⲥ ⲡⲉ ⲡⲙⲁ ⲉ]‐ <text:line-break/><text:span text:style-name="T1"> </text:span><text:span text:style-name="T2">(73/34) </text:span> ⲧⲟⲩⲛⲁϫⲟⲟⲥ ⲛⲁⲉⲓ ϫⲉ̣ [....ⲟⲩⲱⲙ] <text:line-break/><text:span text:style-name="T1"> </text:span><text:span text:style-name="T2">(73/35) </text:span> ⲙ̅ⲡⲁⲉⲓ ⲏ ⲙⲛ̅ⲟⲩⲱⲙ’ ⲙ̣̅[ⲡⲁⲉⲓ ⲛ̅ⲑⲉ ⲉⲧⲕ]‐ <text:line-break/><text:span text:style-name="T1"> </text:span><text:span text:style-name="T2">(74/1) </text:span> ⲟⲩⲱϣ ⲡⲁⲉⲓ ⲡⲙ̣ⲁ [ⲉ]ϯⲛⲁⲟⲩⲱⲙ’ ⲛ̅ⲕⲉ ⲛⲓⲙ’ <text:line-break/><text:span text:style-name="T1"> </text:span><text:span text:style-name="T2">(74/2) </text:span> ⲙ̅ⲙⲁⲩ ⲉϥϣⲟ̣[ⲟ]ⲡ’̣ ⲙ̅ⲙⲁⲩ ⲛ̅ϭⲓ ⲡϣⲏⲛ ⲛ̅ⲧ’‐ <text:line-break/><text:span text:style-name="T1"> </text:span><text:span text:style-name="T2">(74/3) </text:span> ⲅⲛⲱⲥⲓⲥ ⲡⲉⲧⲙ̅ⲙⲁⲩ ⲁϥⲙⲟⲩⲧ’ ⲁⲇⲁⲙ ⲡⲉ‐ <text:line-break/><text:soft-page-break/><text:span text:style-name="T1"> </text:span><text:span text:style-name="T2">(74/4) </text:span> ⲉⲓⲙⲁ ⲇⲉ ⲡϣⲏⲛ’ ⲛ̅ⲧⲅⲛⲱⲥⲓⲥ ⲁϥⲧⲛ̅ϩⲉ ⲡⲣⲱ‐ <text:line-break/><text:span text:style-name="T1"> </text:span><text:span text:style-name="T2">(74/5) </text:span> ⲙⲉ ⲡⲛⲟⲙⲟⲥ ⲛⲉ ⲡϣⲏⲛ ⲡⲉ ⲟⲩⲛ̅ ϭⲟⲙ’ <text:line-break/><text:span text:style-name="T1"> </text:span><text:span text:style-name="T2">(74/6) </text:span> ⲙ̅ⲙⲟϥ ⲛ̅ϥϯ ⲧⲅⲛⲱⲥⲓⲥ ⲙ̅ⲡⲡⲉⲧⲛⲁⲛⲟⲩϥ’ <text:line-break/><text:span text:style-name="T1"> </text:span><text:span text:style-name="T2">(74/7) </text:span> ⲙⲛ̅ ⲡⲉⲑⲟⲟⲩ ⲟⲩⲧⲉ ⲙ̅ⲡⲉϥⲗⲁϭⲉ ⲉⲣⲟϥ ϩⲙ̅ <text:line-break/><text:span text:style-name="T1"> </text:span><text:span text:style-name="T2">(74/8) </text:span> ⲡⲡⲉⲑⲟⲟⲩ ⲟⲩⲧⲉ ⲙ̅ⲡⲉϥ’ⲕⲁⲁϥ ϩⲙ̅ ⲡⲡⲉⲧⲛⲁ‐ <text:line-break/><text:span text:style-name="T1"> </text:span><text:span text:style-name="T2">(74/9) </text:span> ⲛⲟⲩϥ ⲁⲗⲗⲁ ⲁϥⲧⲁⲙⲓⲟ ⲛ̅ⲟⲩⲙⲟⲩ ⲛ̅ⲛⲉⲛⲧⲁϩ‐ <text:line-break/><text:span text:style-name="T1"> </text:span><text:span text:style-name="T2">(74/10) </text:span> ⲟⲩⲱⲙ’ ⲉⲃⲟⲗ ⲛ̅ϩⲏⲧϥ’ ϩⲙ̅ ⲡⲧⲣⲉϥϫⲟⲟⲥ ⲅⲁⲣ <text:line-break/><text:span text:style-name="T1"> </text:span><text:span text:style-name="T2">(74/11) </text:span> ϫⲉ ⲟⲩⲱⲙ’ ⲡⲁⲉⲓ’ ⲙⲛ̅ⲟⲩⲱⲙ’ ⲡⲁⲉⲓ ⲁϥϣⲱ‐ <text:line-break/><text:span text:style-name="T1"> </text:span><text:span text:style-name="T2">(74/12) </text:span> ⲡⲉ ⲛ̅ⲁⲣⲭⲏ’ ⲙ̅ⲡⲙⲟⲩ §ⲡⲭⲣⲉⲓⲥⲙⲁ ϥⲟ ⲛ̅ϫⲟ‐ <text:line-break/><text:span text:style-name="T1"> </text:span><text:span text:style-name="T2">(74/13) </text:span> ⲉⲓⲥ ⲉⲡⲃⲁⲡⲧⲓⲥⲙⲁ ⲉⲃⲟⲗ ⲅⲁⲣ ϩⲙ̅ ⲡⲭⲣⲓⲥⲙⲁ <text:line-break/><text:span text:style-name="T1"> </text:span><text:span text:style-name="T2">(74/14) </text:span> ⲁⲩⲙⲟⲩⲧⲉ ⲉⲣⲟⲛ’ ϫⲉ ⲭⲣⲓⲥⲧⲓⲁⲛⲟⲥ ⲉⲧⲃⲉ <text:line-break/><text:span text:style-name="T1"> </text:span><text:span text:style-name="T2">(74/15) </text:span> ⲡⲃⲁⲡⲧⲓⲥⲙⲁ ⲁⲛ’ ⲁⲩⲱ ⲛ̅ⲧⲁⲩⲙⲟⲩⲧⲉ ⲉⲡⲉ‐ <text:line-break/><text:span text:style-name="T1"> </text:span><text:span text:style-name="T2">(74/16) </text:span> ⲭ̅ⲥ̅ ⲉⲧⲃⲉ ⲡⲭⲣⲓⲥⲙⲁ ⲁⲡⲉⲓⲱⲧ’ ⲅⲁⲣ’ ⲧⲱϩⲥ <text:line-break/><text:span text:style-name="T1"> </text:span><text:span text:style-name="T2">(74/17) </text:span> ⲙ̅ⲡϣⲏⲣⲉ ⲁⲡϣⲏⲣⲉ ⲇⲉ ⲧⲱϩⲥ ⲛ̅ⲁⲡⲟⲥⲧⲟ‐ <text:line-break/><text:span text:style-name="T1"> </text:span><text:span text:style-name="T2">(74/18) </text:span> ⲗⲟⲥ ⲁⲛⲁⲡⲟⲥⲧⲟⲗⲟⲥ ⲇⲉ ⲧⲁϩⲥⲛ̅ ⲡⲉⲛ‐ <text:line-break/><text:span text:style-name="T1"> </text:span><text:span text:style-name="T2">(74/19) </text:span> ⲧⲁⲩⲧⲟϩⲥϥ’ ⲟⲩⲛ̅ⲧⲉϥ’ ⲡⲧⲏⲣϥ’ ⲙ̅ⲙⲁⲩ ⲟⲩⲛ̅‐ <text:line-break/><text:span text:style-name="T1"> </text:span><text:span text:style-name="T2">(74/20) </text:span> ⲧⲁϥ ⲧⲁⲛⲁⲥⲧⲁⲥⲓⲥ ⲡⲟⲩⲟⲉⲓⲛ ⲡⲉⲥxⲟⲥ’ <text:line-break/><text:span text:style-name="T1"> </text:span><text:span text:style-name="T2">(74/21) </text:span> ⲡⲡⲛ̅ⲁ̅ ⲉⲧⲟⲩⲁⲁⲃ’ ⲁⲡⲉⲓⲱⲧ’ ϯ ⲛⲁϥ ⲙ̅ⲡⲁ‐ <text:line-break/><text:span text:style-name="T1"> </text:span><text:span text:style-name="T2">(74/22) </text:span> ⲉⲓ ϩⲙ̅ ⲡⲛⲩ[ⲙ]ⲫⲱⲛ̣ ⲁϥϫⲓ ⲁϥϣⲱⲡⲉ ⲛ̅ϭⲓ <text:line-break/><text:span text:style-name="T1"> </text:span><text:span text:style-name="T2">(74/23) </text:span> ⲡⲉⲓⲱⲧ’ ϩⲙ̣̅ ⲡϣ̣[ⲏ]ⲣ̣ⲉ ⲁⲩⲱ ⲡϣⲏⲣⲉ ϩⲙ̅ ⲡⲉⲓ‐ <text:line-break/><text:span text:style-name="T1"> </text:span><text:span text:style-name="T2">(74/24) </text:span> ⲱⲧ’ ⲧⲁⲉⲓ ⲧ[ⲉ ⲧⲙⲛ̅ⲧ]ⲉⲣⲟ ⲛⲙ̅ⲡⲏⲩⲉ §ⲕⲁⲗⲱⲥ <text:line-break/><text:span text:style-name="T1"> </text:span><text:span text:style-name="T2">(74/25) </text:span> ⲁⲡϫⲟⲉⲓⲥ ϫⲟⲟ[ⲥ ϫ]ⲉ ⲁϩⲟⲉⲓⲛⲉ ⲃⲱⲕ’ ⲉⲧⲙⲛ̅‐ <text:line-break/><text:span text:style-name="T1"> </text:span><text:span text:style-name="T2">(74/26) </text:span> ⲧⲉⲣⲟ ⲛⲙ̅ⲡⲏⲩ[ⲉ] ⲉⲩⲥⲱⲃⲉ ⲁⲩⲱ ⲁⲩⲉⲓ ⲉⲃⲟⲗ <text:line-break/><text:span text:style-name="T1"> </text:span><text:span text:style-name="T2">(74/27) </text:span> [...]ⲱ̣[.]ⲉ̣ⲁⲩ[...]ⲟⲩⲁ ϫⲉ ⲟⲩⲭⲣⲏⲥⲧⲓⲁⲛⲟⲥ <text:line-break/><text:span text:style-name="T1"> </text:span><text:span text:style-name="T2">(74/28) </text:span> [...]ⲡⲉⲭ̣[..]’ [....] ⲟⲛ ⲁⲩⲱ ⲛ̅ⲧⲉⲩⲛⲟⲩ’ <text:line-break/><text:span text:style-name="T1"> </text:span><text:span text:style-name="T2">(74/29) </text:span> [........ⲃⲱⲕ ⲉⲡ]ⲓ̣ⲧⲛ̅ ⲉⲡⲙⲟⲟⲩ ⲁϥⲉⲓ <text:line-break/><text:span text:style-name="T1"> </text:span><text:span text:style-name="T2">(74/30) </text:span> [............]ⲥ̣ ⲁ̣ⲡⲧⲙⲣϥ’ ⲉⲧⲃⲉ <text:line-break/><text:span text:style-name="T1"> </text:span><text:span text:style-name="T2">(74/31) </text:span> [..........ⲟⲩⲡ]ⲁⲓⲅⲛⲓⲟⲛ ⲡⲉ ⲁⲗ‐ <text:line-break/><text:span text:style-name="T1"> </text:span><text:span text:style-name="T2">(74/32) </text:span> [ⲗⲁ ........ⲣ̅ⲕⲁⲧⲁⲫ]ⲣⲟⲛⲉⲓ ⲙ̅ⲡⲉⲉⲓⲡⲉ‐ <text:line-break/><text:span text:style-name="T1"> </text:span><text:span text:style-name="T2">(74/33) </text:span> [..........]ⲛ’ ⲉⲧⲙⲛ̅ⲧⲉⲣⲟ ⲛⲙ̅‐ <text:line-break/><text:span text:style-name="T1"> </text:span><text:span text:style-name="T2">(74/34) </text:span> [ⲡⲏⲩⲉ ......] ⲉ̣ϥϣⲁⲣ̅ⲕⲁⲧⲁⲫⲣⲟⲛⲉ <text:line-break/><text:span text:style-name="T1"> </text:span><text:span text:style-name="T2">(74/35) </text:span> [......ⲁ]ⲩ̣ⲱ ⲛ̅ϥϣⲟⲥϥ’ ϩⲱⲥ ⲡⲁⲓⲅⲛⲓ‐ <text:line-break/><text:span text:style-name="T1"> </text:span><text:span text:style-name="T2">(74/36) </text:span> [ⲟⲛ....ⲉⲃ]ⲟ̣ⲗ ⲉϥⲥⲱⲃⲉ ⲧⲉⲉⲓϩⲉ ⲟⲛ ⲧⲉ <text:line-break/><text:span text:style-name="T1"> </text:span><text:span text:style-name="T2">(75/1) </text:span> ϩⲓ ⲡⲟⲉⲓⲕ’ ⲙⲛ̅ ⲡⲡⲟ[ⲧ]ⲏⲣⲓⲟⲛ ⲙⲛ̅ ⲡⲛⲏϩ <text:line-break/><text:span text:style-name="T1"> </text:span><text:span text:style-name="T2">(75/2) </text:span> ⲕⲁⲛ ⲟⲩⲛ̅ ⲕⲉⲟⲩⲁ ⲉϥϫⲟⲥⲉ ⲉⲛⲁⲉⲓ §ⲁⲡ’‐ <text:line-break/><text:span text:style-name="T1"> </text:span><text:span text:style-name="T2">(75/3) </text:span> ⲕⲟⲥⲙⲟⲥ ϣⲱⲡⲉ ϩⲛ̅ ⲟⲩⲡⲁⲣⲁⲡⲧⲱⲙⲁ <text:line-break/><text:span text:style-name="T1"> </text:span><text:span text:style-name="T2">(75/4) </text:span> ⲡⲉⲛⲧⲁϩⲧⲁⲙⲓⲟϥ ⲅⲁⲣ’ ⲛⲉϥ’ⲟⲩⲱϣ’ ⲁⲧⲁ‐ <text:line-break/><text:span text:style-name="T1"> </text:span><text:span text:style-name="T2">(75/5) </text:span> ⲙⲓⲟϥ’ ⲉϥⲟ ⲛ̅ⲁⲧ’ⲧⲁⲕⲟ ⲁⲩⲱ ⲛⲁⲑⲁⲛⲁⲧⲟⲥ <text:line-break/><text:span text:style-name="T1"> </text:span><text:span text:style-name="T2">(75/6) </text:span> ⲁϥϩⲉ ⲉⲃⲟⲗ ⲁⲩⲱ ⲙ̅ⲡⲉϥ’ⲙⲉⲧⲉ ⲁⲑⲉⲗⲡⲓⲥ <text:line-break/><text:span text:style-name="T1"> </text:span><text:span text:style-name="T2">(75/7) </text:span> ⲛⲉⲥϣⲟⲟⲡ’ ⲅⲁⲣ ⲁⲛ ⲛ̅ϭⲓ ⲧⲙⲛ̅ⲧⲁⲧⲧⲉⲕⲟ <text:line-break/><text:span text:style-name="T1"> </text:span><text:span text:style-name="T2">(75/8) </text:span> ⲙ̅ⲡⲕⲟⲥⲙⲟⲥ ⲁⲩⲱ † ⲛⲉϥϣⲟⲟⲡ’ ⲁⲛ ⲛ̅ϭⲓ <text:line-break/><text:span text:style-name="T1"> </text:span><text:span text:style-name="T2">(75/9) </text:span> ⲧⲙ̅ⲛ̅ⲧⲁⲧ’ⲧⲁⲕⲟ ⲙ̅ⲡⲉⲛⲧⲁϩⲧⲁⲙⲓⲉ ⲡⲕⲟⲥ‐ <text:line-break/><text:span text:style-name="T1"> </text:span><text:span text:style-name="T2">(75/10) </text:span> ⲙⲟⲥ ⲥϣⲟⲟⲡ ⲅⲁⲣ ⲁⲛ ⲛ̅ϭⲓ ⲧⲙ̅ⲛ̅ⲧⲁⲧ’ⲧⲁ‐ <text:line-break/><text:span text:style-name="T1"> </text:span><text:span text:style-name="T2">(75/11) </text:span> ⲕⲟ ⲛ̅ⲛ̅ϩⲃⲏⲩⲉ ⲁⲗⲗⲁ ⲛ̅ⲛ̅ϣⲏⲣⲉ ⲁⲩⲱ ⲙⲛ̅ <text:line-break/><text:span text:style-name="T1"> </text:span><text:span text:style-name="T2">(75/12) </text:span> ⲟⲩϩⲱⲃ’ ⲛⲁϣϫⲓ ⲛ̅ⲟⲩⲙ̅ⲛ̅ⲧⲁⲧⲧⲁⲕⲟ ⲉϥⲧⲙ̅‐ <text:line-break/><text:span text:style-name="T1"> </text:span><text:span text:style-name="T2">(75/13) </text:span> ϣⲱⲡⲉ ⲛ̅ϣⲏⲣⲉ ⲡⲉⲧⲉ ⲙⲛ̅ ϭⲟⲙ ⲇⲉ ⲙ̅ⲙⲟϥ’ <text:line-break/><text:span text:style-name="T1"> </text:span><text:span text:style-name="T2">(75/14) </text:span> ⲉϫⲓ ⲡⲟⲥⲱ ⲙⲁⲗⲗⲟⲛ ϥⲛⲁϣϯ ⲁⲛ §ⲡⲡⲟⲧⲏ‐ <text:line-break/><text:soft-page-break/><text:span text:style-name="T1"> </text:span><text:span text:style-name="T2">(75/15) </text:span> ⲣⲓⲟⲛ’ ⲙ̅ⲡϣⲗⲏⲗ ⲟⲩⲛ̅ⲧⲁϥ ⲏⲣⲡ’ ⲙ̅ⲙⲁⲩ ⲟⲩ‐ <text:line-break/><text:span text:style-name="T1"> </text:span><text:span text:style-name="T2">(75/16) </text:span> ⲛ̅ⲧⲁϥ’ ⲙⲟⲟⲩ ⲉϥ’ⲕⲏ ⲉϩⲣⲁⲓ̈ ⲉⲡⲧⲩⲡⲟⲥ’ ⲙ̅‐ <text:line-break/><text:span text:style-name="T1"> </text:span><text:span text:style-name="T2">(75/17) </text:span> ⲡⲉⲥⲛⲟϥ’ ⲉⲧⲟⲩⲣ̅ⲉⲩⲭⲁⲣⲓⲥⲧⲉⲓ ⲉϫⲱϥ ⲁⲩ‐ <text:line-break/><text:span text:style-name="T1"> </text:span><text:span text:style-name="T2">(75/18) </text:span> ⲱ ϥⲙⲟⲩϩ ⲉⲃⲟⲗ ϩⲙ̅ ⲡⲡ̅ⲛ̅ⲁ̅ ⲉⲧⲟⲩⲁⲁⲃ ⲁⲩ‐ <text:line-break/><text:span text:style-name="T1"> </text:span><text:span text:style-name="T2">(75/19) </text:span> ⲱ ⲡⲁ ⲡⲧⲉⲗⲉⲓⲟⲥ ⲧⲏⲣϥ ⲣ̅ⲣⲱⲙⲉ ⲡⲉ ϩⲟⲧⲁⲛ <text:line-break/><text:span text:style-name="T1"> </text:span><text:span text:style-name="T2">(75/20) </text:span> ⲉⲛ’ϣⲁⲛⲥⲱ ⲙ̅ⲡⲁⲉⲓ ⲧⲛⲁϫⲓ ⲛⲁⲛ ⲙ̅ⲡⲧⲉ‐ <text:line-break/><text:span text:style-name="T1"> </text:span><text:span text:style-name="T2">(75/21) </text:span> ⲗⲉⲓⲟⲥ ⲣ̅ⲣⲱⲙⲉ ⲡⲙⲟⲟⲩ ⲉⲧⲟⲛϩ ⲟⲩⲥⲱⲙⲁ <text:line-break/><text:span text:style-name="T1"> </text:span><text:span text:style-name="T2">(75/22) </text:span> ⲡⲉ ϣϣⲉ ⲉⲧⲣⲛ̅ϯ ϩⲓⲱⲱⲛ ⲙ̅ⲡⲣⲱⲙⲉ ⲉⲧⲟⲛϩ <text:line-break/><text:span text:style-name="T1"> </text:span><text:span text:style-name="T2">(75/23) </text:span> ⲉⲧⲃⲉ ⲡⲁⲉⲓ ⲉϥⲉⲓ ⲉϥⲃⲏⲕ’ ⲉⲡⲓⲧⲛ̅ ⲉⲡⲙⲟ‐ <text:line-break/><text:span text:style-name="T1"> </text:span><text:span text:style-name="T2">(75/24) </text:span> ⲟⲩ ϣⲁϥⲕⲁⲕϥ ⲁϩⲏⲩ ϣⲓⲛⲁ ⲉϥⲛⲁϯ ⲡⲏ <text:line-break/><text:span text:style-name="T1"> </text:span><text:span text:style-name="T2">(75/25) </text:span> ϩⲓⲱⲱϥ’ §ϣⲁⲣⲉ ⲟⲩϩⲧⲟ ϫⲡⲉ ⲟⲩϩⲧⲟ ⲟⲩ‐ <text:line-break/><text:span text:style-name="T1"> </text:span><text:span text:style-name="T2">(75/26) </text:span> ⲣⲱⲙⲉ ϣⲁⲣⲉϥ’ϫⲡⲉ ⲣⲱⲙⲉ ⲟⲩⲛⲟⲩⲧⲉ <text:line-break/><text:span text:style-name="T1"> </text:span><text:span text:style-name="T2">(75/27) </text:span> ϣⲁⲣⲉϥϫⲡⲉ ⲛⲟⲩⲧⲉ ⲧⲁⲉⲓ ⲧⲉ ⲑ̣ⲉ ϩⲙ̣̅[ⲡⲁ ⲧ]‐ <text:line-break/><text:span text:style-name="T1"> </text:span><text:span text:style-name="T2">(75/28) </text:span> ϣⲉⲗⲉⲉⲧ’ ⲙⲛ̅ ϩⲛ̣̅[ⲕⲉϣⲉ]ⲗⲉⲉ̣ⲧ’ ⲁⲩ[ϣⲱ]‐ <text:line-break/><text:span text:style-name="T1"> </text:span><text:span text:style-name="T2">(75/29) </text:span> ⲡⲉ ⲉⲃⲟⲗ ϩⲙ̅ ⲡⲛ[......] ⲛ̣̅[....] <text:line-break/><text:span text:style-name="T1"> </text:span><text:span text:style-name="T2">(75/30) </text:span> ⲛⲉ ⲙⲛ̅ ⲓⲟⲩⲇⲁⲓ ⲟ̣[............] <text:line-break/><text:span text:style-name="T1"> </text:span><text:span text:style-name="T2">(75/31) </text:span> ⲉⲃⲟⲗ ϩⲛ̅ ⲛ̅ϩⲉ[............] <text:line-break/><text:span text:style-name="T1"> </text:span><text:span text:style-name="T2">(75/32) </text:span> ϣⲟⲟⲡ’ ⲁⲩⲱ ⲁⲛ̣[............] <text:line-break/><text:span text:style-name="T1"> </text:span><text:span text:style-name="T2">(75/33) </text:span> ⲉⲃⲟⲗ ϩⲛ̅ ⲛ̅ ⲓⲟⲩⲇ[ⲁⲓ ........] <text:line-break/><text:span text:style-name="T1"> </text:span><text:span text:style-name="T2">(75/34) </text:span> ⲛ̅ⲭⲣⲓⲥⲧⲓⲁⲛⲟⲥ ⲁⲕ[...........] <text:line-break/><text:span text:style-name="T1"> </text:span><text:span text:style-name="T2">(75/35) </text:span> ⲱ ⲁⲩⲙⲟⲩⲧⲉ ⲁⲛⲉⲉⲓⲙⲁ[.....] <text:line-break/><text:span text:style-name="T1"> </text:span><text:span text:style-name="T2">(75/36) </text:span> ⲡⲅⲉⲛⲟⲥ ⲉⲧⲥⲟⲧⲡ’ ⲙ̅ⲡⲛ̣[.....] <text:line-break/><text:span text:style-name="T1"> </text:span><text:span text:style-name="T2">(76/1) </text:span> ⲁⲩⲱ ⲡⲁⲗⲏⲑⲉⲓⲛ̣ⲟⲥ̣ ⲣ̣̅ⲣⲱⲙⲉ ⲁⲩⲱ ⲡϣⲏⲣⲉ <text:line-break/><text:span text:style-name="T1"> </text:span><text:span text:style-name="T2">(76/2) </text:span> ⲙ̅ⲡⲣⲱⲙⲉ ⲁⲩⲱ ⲡⲥⲡⲉⲣⲙⲁ ⲙ̅ⲡϣⲏⲣⲉ ⲙ̅ⲡⲣⲱ‐ <text:line-break/><text:span text:style-name="T1"> </text:span><text:span text:style-name="T2">(76/3) </text:span> ⲙⲉ ⲡⲉⲉⲓⲅⲉⲛⲟⲥ ⲛ̅ⲁⲗⲏⲑⲉⲓⲛⲟⲛ ⲥⲉⲣ̅ⲟⲛⲟ‐ <text:line-break/><text:span text:style-name="T1"> </text:span><text:span text:style-name="T2">(76/4) </text:span> ⲙⲁⲍⲉ ⲙ̅ⲙⲟϥ’ ϩⲙ̅ ⲡⲕⲟⲥⲙⲟⲥ † ⲛⲁⲉⲓ ⲛⲉ ⲡⲙⲁ † <text:line-break/><text:span text:style-name="T1"> </text:span><text:span text:style-name="T2">(76/5) </text:span> ⲉⲧⲟⲩϣⲟⲟⲡ’ ⲙ̅ⲙⲁⲩ ⲛ̅ϭⲓ ⲛ̅ϣⲏⲣⲉ ⲙ̅ⲡⲛⲩⲙ‐ <text:line-break/><text:span text:style-name="T1"> </text:span><text:span text:style-name="T2">(76/6) </text:span> ⲫⲱⲛ §ⲉⲡϩⲱⲧⲣ̅ ϣⲟⲟⲡ’ ϩⲙ̅ ⲡⲉⲉⲓⲕⲟⲥⲙⲟⲥ <text:line-break/><text:span text:style-name="T1"> </text:span><text:span text:style-name="T2">(76/7) </text:span> ϩⲟⲟⲩⲧ ϩⲓ ⲥϩⲓⲙⲉ † ⲡⲙⲁ ⲉⲧϭⲟⲙ ⲙⲛ̅ ⲧⲙⲛⲧ’‐ <text:line-break/><text:span text:style-name="T1"> </text:span><text:span text:style-name="T2">(76/8) </text:span> ϭⲱⲃ † ϩⲙ̅ ⲡⲁⲓⲱⲛ ⲕⲉⲟⲩⲁ ⲡⲉ ⲡⲉⲓⲛⲉ ⲙ̅ⲡϩⲱ‐ <text:line-break/><text:span text:style-name="T1"> </text:span><text:span text:style-name="T2">(76/9) </text:span> ⲧⲣ̅ ⲉⲙ’ⲙⲟⲩⲧⲉ ⲇⲉ ⲉⲣⲟⲟⲩ ⲛ̅ⲛⲉⲉⲓⲣⲁⲛ ⲟⲩⲛ ϩⲛ̅‐ <text:line-break/><text:span text:style-name="T1"> </text:span><text:span text:style-name="T2">(76/10) </text:span> ⲕⲟⲟⲩⲉ ⲇⲉ ϣⲟⲟⲡ’ ⲥⲉϫⲟⲥⲉ ⲡⲁⲣⲁ ⲣⲁⲛ’ <text:line-break/><text:span text:style-name="T1"> </text:span><text:span text:style-name="T2">(76/11) </text:span> ⲛⲓⲙ ⲉⲧⲟⲩⲣ̅ⲟⲛⲟⲙⲁⲍⲉ ⲙ̅ⲙⲟⲟⲩ ⲁⲩⲱ ⲥⲉ‐ <text:line-break/><text:span text:style-name="T1"> </text:span><text:span text:style-name="T2">(76/12) </text:span> ϫⲟⲟⲥⲉ ⲉⲡϫⲱⲱⲣⲉ ⲡⲙⲁ ⲅⲁⲣ ⲉⲧⲉ ⲟⲩⲛ̅ ⲃⲓⲁ <text:line-break/><text:span text:style-name="T1"> </text:span><text:span text:style-name="T2">(76/13) </text:span> ⲙ̅ⲙⲁⲩ ⲉⲩϣⲟⲟⲡ’ ⲙ̅ⲙⲁⲩ ⲛ̅ϭⲓ ⲛⲉⲧ’ⲥⲟⲧⲡ’ <text:line-break/><text:span text:style-name="T1"> </text:span><text:span text:style-name="T2">(76/14) </text:span> ⲉⲧϭⲟⲙ ⲛⲉⲧⲙ̅ⲙⲁⲩ ⲕⲉⲟⲩⲁ ⲁⲛ ⲡⲉ ⲁⲩⲱ ⲕⲉ‐ <text:line-break/><text:span text:style-name="T1"> </text:span><text:span text:style-name="T2">(76/15) </text:span> ⲟⲩⲁ ⲡⲉ ⲁⲗⲗⲁ ⲛ̅ⲧⲟⲟⲩ ⲙ̅ⲡⲉⲥⲛⲁⲩ ⲡⲓⲟⲩⲁ <text:line-break/><text:span text:style-name="T1"> </text:span><text:span text:style-name="T2">(76/16) </text:span> ⲟⲩⲱⲧ’ ⲡⲉ ⲡⲁⲉⲓ ⲡⲉ ⲉⲧϥⲛⲁϣⲓ ⲁⲛ ⲉϩⲣⲁⲓ̈ <text:line-break/><text:span text:style-name="T1"> </text:span><text:span text:style-name="T2">(76/17) </text:span> ⲉϫⲛ̅ ⲫⲏⲧ’ ⲛ̅ⲥⲁⲣⲝ §ⲟⲩⲟⲛ’ ⲛⲓⲙ ⲉⲧⲟⲩⲛ̅ⲧⲟⲩ <text:line-break/><text:span text:style-name="T1"> </text:span><text:span text:style-name="T2">(76/18) </text:span> ⲡⲧⲏⲣϥ’ ⲙ̅ⲙⲁⲩ ϣϣⲉ ⲁⲛ ⲉⲧⲣⲟⲩⲉⲓⲙⲉ ⲙ̅‐ <text:line-break/><text:span text:style-name="T1"> </text:span><text:span text:style-name="T2">(76/19) </text:span> ⲙ̅ⲙⲟⲟⲩ ⲧⲏⲣⲟⲩ ϩⲟⲉⲓⲛⲉ ⲙⲉⲛ ⲉⲩⲧⲙ̅ⲉⲓⲙⲉ <text:line-break/><text:span text:style-name="T1"> </text:span><text:span text:style-name="T2">(76/20) </text:span> ⲙ̅ⲙⲟⲟⲩ ⲥⲉⲛⲁⲣ̅ⲁⲡⲟⲗⲁⲩⲉ ⲁⲛ ⲛ̅ⲛⲉⲧⲉ <text:line-break/><text:span text:style-name="T1"> </text:span><text:span text:style-name="T2">(76/21) </text:span> ⲟⲩⲛ̅ⲧⲁⲩⲥⲉ ⲛⲉⲧⲁϩⲥⲉⲃⲟ ⲇⲉ ⲉⲣⲟⲟⲩ ⲥⲉⲛⲁ‐ <text:line-break/><text:span text:style-name="T1"> </text:span><text:span text:style-name="T2">(76/22) </text:span> ⲣ̅ⲁⲡⲟⲗⲁⲩⲉ ⲙ̅ⲙⲟⲟⲩ §ⲟⲩ ⲙⲟⲛⲟⲛ ⲡⲣⲱⲙⲉ <text:line-break/><text:span text:style-name="T1"> </text:span><text:span text:style-name="T2">(76/23) </text:span> ⲛ̅ⲧⲉⲗⲉⲓⲟⲥ ⲥⲉⲛⲁϣⲉⲙⲁϩⲧⲉ ⲁⲛ ⲙ̅ⲙⲟϥ’ <text:line-break/><text:span text:style-name="T1"> </text:span><text:span text:style-name="T2">(76/24) </text:span> ⲁⲗⲗⲁ ⲥⲉⲛⲁϣⲛⲁⲩ ⲉⲣⲟϥ ⲁⲛ ⲉⲩϣⲁⲛⲛⲁⲩ <text:line-break/><text:span text:style-name="T1"> </text:span><text:span text:style-name="T2">(76/25) </text:span> ⲅⲁⲣ’ ⲉⲣⲟϥ’ ⲥⲉⲛⲁⲉⲙⲁϩⲧⲉ ⲙ̅ⲙⲟϥ’ ⲛ̅ⲕⲉⲣⲏⲧⲉ <text:line-break/><text:soft-page-break/><text:span text:style-name="T1"> </text:span><text:span text:style-name="T2">(76/26) </text:span> ⲙⲛ̅ ⲟⲩⲁ ⲛⲁϣϫⲡⲟ ⲛⲁϥ’ ⲛ̅ⲧⲉⲉⲓⲭⲁⲣⲓⲥ ⲉⲓ <text:line-break/><text:span text:style-name="T1"> </text:span><text:span text:style-name="T2">(76/27) </text:span> [ⲙⲏ ⲛ̅]ϥϯ ϩ[ⲓ]ⲱⲱϥ ⲙ̅ⲡⲧⲉⲗⲉⲓⲟⲛ’ ⲛ̅ⲟⲩⲟⲉⲓⲛ <text:line-break/><text:span text:style-name="T1"> </text:span><text:span text:style-name="T2">(76/28) </text:span> [ⲁⲩⲱ] ⲛ̅ϥϣⲱ[ⲡⲉ ϩ]ⲱ̣ⲱϥ ⲛ̅ⲧⲉⲗⲉⲓⲟⲛ ⲟⲩⲟ‐ <text:line-break/><text:span text:style-name="T1"> </text:span><text:span text:style-name="T2">(76/29) </text:span> [ⲉⲓⲛ ⲡⲉ]ⲛ̣ⲧ̣ⲁ̣[ϩ’ⲧⲁⲁϥ’] ϩ̣ⲓⲱⲱϥ’ ϥⲛⲁⲃⲱⲕ’ <text:line-break/><text:span text:style-name="T1"> </text:span><text:span text:style-name="T2">(76/30) </text:span> [...........] ⲡⲁⲉⲓ ⲡⲉ ⲡⲧⲉⲗⲉⲓⲟⲛ <text:line-break/><text:span text:style-name="T1"> </text:span><text:span text:style-name="T2">(76/31) </text:span> [............] ⲉⲧⲣⲛ̅ϣⲱⲡⲉ ⲛ̅‐ <text:line-break/><text:span text:style-name="T1"> </text:span><text:span text:style-name="T2">(76/32) </text:span> [............]ⲱⲥ ⲉⲙ’ⲡⲁⲧⲛ̅ⲉⲓ ⲉ‐ <text:line-break/><text:span text:style-name="T1"> </text:span><text:span text:style-name="T2">(76/33) </text:span> [...........] ⲡⲉⲧⲁ⟦ϩ⟧ϫⲓ ⲡⲧⲏⲣϥ’ <text:line-break/><text:span text:style-name="T1"> </text:span><text:span text:style-name="T2">(76/34) </text:span> [..........] ⲁⲛⲉⲉⲓⲙⲁ ϥⲛⲁϣ ⲣ̅‐ <text:line-break/><text:span text:style-name="T1"> </text:span><text:span text:style-name="T2">(76/35) </text:span> [........]ⲡ̣ⲙⲁ ⲉⲧⲙ̅ⲙⲁⲩ ⲁⲗⲗⲁ ϥⲛⲁ‐ <text:line-break/><text:span text:style-name="T1"> </text:span><text:span text:style-name="T2">(76/36) </text:span> [....ⲧⲙⲉ]ⲥ̣ⲟⲧⲏⲥ ϩⲱⲥ ⲁⲧϫⲱⲕ’ ⲉⲃⲟⲗ <text:line-break/><text:span text:style-name="T1"> </text:span><text:span text:style-name="T2">(77/1) </text:span> ⲙⲟⲛⲟⲛ ⲓ̅ⲥ̅ ⲥⲟⲟⲩⲛ ⲙ̣̅ⲡⲧⲉⲗⲟⲥ ⲙ̅ⲡⲁⲉⲓ <text:line-break/><text:span text:style-name="T1"> </text:span><text:span text:style-name="T2">(77/2) </text:span> §ⲡⲣⲱⲙⲉ ⲉⲧⲟⲩⲁⲁⲃ ϥⲟⲩⲁⲁⲃ ⲧⲏⲣϥ’ ϣⲁϩ‐ <text:line-break/><text:span text:style-name="T1"> </text:span><text:span text:style-name="T2">(77/3) </text:span> ⲣⲁⲓ̈ ⲉⲡⲉϥ’ⲥⲱⲙⲁ ⲉϣϫⲉ ⲁϥϫⲓ ⲅⲁⲣ’ ⲙ̅ⲡⲟ‐ <text:line-break/><text:span text:style-name="T1"> </text:span><text:span text:style-name="T2">(77/4) </text:span> ⲉⲓⲕ’ ϥⲛⲁⲁϥ’ ⲉϥ’ⲟⲩⲁⲁⲃ’ ⲏ ⲡⲡⲟⲧⲏⲣⲓⲟⲛ <text:line-break/><text:span text:style-name="T1"> </text:span><text:span text:style-name="T2">(77/5) </text:span> ⲏ ⲡⲕⲉⲥⲉⲉⲡⲉ ⲧⲏⲣϥ’ ⲉⲧϥϫⲓ ⲙ̅ⲙⲟⲟⲩ ⲉϥ’‐ <text:line-break/><text:span text:style-name="T1"> </text:span><text:span text:style-name="T2">(77/6) </text:span> ⲧⲟⲩⲃⲟ ⲙ̅ⲙⲟⲟⲩ ⲁⲩⲱ ⲡⲱⲥ ϥⲛⲁⲧⲟⲩⲃⲟ <text:line-break/><text:span text:style-name="T1"> </text:span><text:span text:style-name="T2">(77/7) </text:span> ⲁⲛ ⲙ̅ⲡⲕⲉⲥⲱⲙⲁ §ⲛ̅ⲑⲉ ⲛ̅ⲧⲁ ⲓ̅ⲥ̅ ϫⲱⲕ’ ⲉⲃⲟⲗ <text:line-break/><text:span text:style-name="T1"> </text:span><text:span text:style-name="T2">(77/8) </text:span> ⲙ̅ⲡⲙⲟⲟⲩ ⲙ̅ⲡⲃⲁⲡⲧⲓⲥⲙⲁ ⲧⲁⲉⲓ ⲧⲉ ⲑⲉ ⲁϥ’‐ <text:line-break/><text:span text:style-name="T1"> </text:span><text:span text:style-name="T2">(77/9) </text:span> ⲡⲱϩⲧ’ ⲉⲃⲟⲗ’ ⲙ̅ⲡⲙⲟⲩ ⲉⲧⲃⲉ ⲡⲁⲉⲓ ⲧⲛ̅ⲃⲏⲕ’ <text:line-break/><text:span text:style-name="T1"> </text:span><text:span text:style-name="T2">(77/10) </text:span> ⲙⲉⲛ ⲉⲡⲓⲧⲛ̅ ⲉⲡⲙⲟⲟⲩ ⲧⲛ̅ⲃⲏⲕ ⲇⲉ ⲁⲛ <text:line-break/><text:span text:style-name="T1"> </text:span><text:span text:style-name="T2">(77/11) </text:span> ⲉⲡⲓⲧⲛ̅ ⲉⲡⲙⲟⲩ ϣⲓⲛⲁ ϫⲉ ⲛⲟⲩⲡⲁϩⲧⲛ̅ <text:line-break/><text:span text:style-name="T1"> </text:span><text:span text:style-name="T2">(77/12) </text:span> ⲉⲃⲟⲗ ϩⲙ̅ ⲡⲡⲛ̅ⲁ̅ ⲙ̅ⲡⲕⲟⲥⲙⲟⲥ ϩⲟⲧⲁⲛ <text:line-break/><text:span text:style-name="T1"> </text:span><text:span text:style-name="T2">(77/13) </text:span> ⲉϥϣⲁⲛⲛⲓϥⲉ ϣⲁⲣⲉϥ’ⲧⲉ ⲧⲡⲣⲱ ϣⲱⲡⲉ <text:line-break/><text:span text:style-name="T1"> </text:span><text:span text:style-name="T2">(77/14) </text:span> ⲡⲡⲛ̅ⲁ̅ ⲉⲧⲟⲩⲁⲁⲃ ϩⲟⲧⲁⲛ’ ⲉϥ’ϣⲁⲛⲛⲓϥⲉ <text:line-break/><text:span text:style-name="T1"> </text:span><text:span text:style-name="T2">(77/15) </text:span> ϣⲁⲣⲉ ⲧϣⲁⲙⲏ ϣⲱⲡⲉ’ §ⲡⲉⲧⲉⲩⲛ̅ⲧⲁϥ’ ⲙ̅‐ <text:line-break/><text:span text:style-name="T1"> </text:span><text:span text:style-name="T2">(77/16) </text:span> ⲙⲁⲩ ⲛ̅ⲧⲅⲛⲱⲥⲓⲥ ⲛ̅ⲧⲙⲉ ⲟⲩⲉⲗⲉⲩⲑⲉⲣⲟⲥ <text:line-break/><text:span text:style-name="T1"> </text:span><text:span text:style-name="T2">(77/17) </text:span> ⲡⲉ ⲡⲉⲗⲉⲩⲑⲉⲣⲟⲥ ⲇⲉ ⲙⲁϥⲣ̅ ⲛⲟⲃⲉ ⲡⲉ‐ <text:line-break/><text:span text:style-name="T1"> </text:span><text:span text:style-name="T2">(77/18) </text:span> ϯⲣⲉ ⲅⲁⲣ ⲙ̅ⲡⲛⲟⲃⲉ ⲡϩⲙ̅ϩ̅ⲁ̅ⲗ̅ ⲙ̅ⲡⲛⲟⲃⲉ <text:line-break/><text:span text:style-name="T1"> </text:span><text:span text:style-name="T2">(77/19) </text:span> ⲡⲉ ⲧⲙⲁⲁⲩ ⲧⲉ ⲧⲁⲗⲏⲑⲉⲓⲁ ⲧⲅⲛⲱⲥⲓⲥ ⲇⲉ <text:line-break/><text:span text:style-name="T1"> </text:span><text:span text:style-name="T2">(77/20) </text:span> ⲡⲉ ⲡⲧⲱⲧ’ ⲛⲉⲧⲉⲥⲧⲟ ⲛⲁⲩ ⲁⲛ ⲁⲣ̅ ⲛⲟⲃⲉ <text:line-break/><text:span text:style-name="T1"> </text:span><text:span text:style-name="T2">(77/21) </text:span> ⲉⲡⲕⲟⲥⲙⲟⲥ ⲙⲟⲩⲧⲉ ⲉⲣⲟⲟⲩ ϫⲉ ⲉⲗⲉⲩ‐ <text:line-break/><text:span text:style-name="T1"> </text:span><text:span text:style-name="T2">(77/22) </text:span> ⲑⲉⲣⲟⲥ ⲛⲁⲉⲓ ⲉⲧⲥⲧⲟ ⲛⲁⲩ ⲁⲛ ⲁⲣ̅ ⲛⲟⲃⲉ <text:line-break/><text:span text:style-name="T1"> </text:span><text:span text:style-name="T2">(77/23) </text:span> ⲧⲅⲛⲱⲥⲓⲥ ⲛ̅ⲧⲁⲗⲏⲑⲉⲓⲁ ϫⲓⲥⲉ ⲛ̅ϩⲏⲧ’ ⲉⲧⲉ <text:line-break/><text:span text:style-name="T1"> </text:span><text:span text:style-name="T2">(77/24) </text:span> ⲡⲁⲉⲓ ⲡⲉ ⲥⲉⲓⲣⲉ ⲙ̅ⲙⲟⲟⲩ ⲛ̅ⲉⲗⲉⲩⲑⲉⲣⲟⲥ <text:line-break/><text:span text:style-name="T1"> </text:span><text:span text:style-name="T2">(77/25) </text:span> ⲁⲩⲱ ⲥⲧⲣⲟⲩϫⲓⲥⲉ ⲉⲡⲙⲁ ⲧⲏⲣϥ’ ⲧⲁⲅⲁⲡⲏ <text:line-break/><text:span text:style-name="T1"> </text:span><text:span text:style-name="T2">(77/26) </text:span> ⲇⲉ ⲕⲱⲧ’ ⲡⲉⲧⲁϩⲣ̅ ⲉⲗⲉⲩⲑⲉⲣⲟⲥ ⲇⲉ ϩⲓ‐ <text:line-break/><text:span text:style-name="T1"> </text:span><text:span text:style-name="T2">(77/27) </text:span> ⲧⲛ̅ ⲧⲅⲛⲱⲥⲓⲥ ϥⲟ ⲛ̅ϩⲙϩ̅ⲁ̅ⲗ̅ ⲉⲧⲃⲉ ⲧⲁⲅⲁ‐ <text:line-break/><text:span text:style-name="T1"> </text:span><text:span text:style-name="T2">(77/28) </text:span> ⲡⲏ ⲛ̅ⲛⲁⲉⲓ ⲉⲙ’ⲡⲁⲧⲟⲩϣϥⲓ ⲉϩⲣⲁⲓ̣̈ [ⲛ̅ⲧⲉ]‐ <text:line-break/><text:span text:style-name="T1"> </text:span><text:span text:style-name="T2">(77/29) </text:span> ⲗⲉⲩⲑⲉⲣⲓⲁ ⲛ̅ⲧⲅⲛⲱⲥⲓⲥ ⲧⲅⲛⲱ[ⲥⲓⲥ ⲇⲉ] <text:line-break/><text:span text:style-name="T1"> </text:span><text:span text:style-name="T2">(77/30) </text:span> ⲥⲉⲓⲣⲉ ⲙ̅ⲙⲟⲟⲩ ⲛ̅ϣⲓⲕⲁⲛⲟⲥ ⲉⲥ̣[ⲧⲣⲟⲩ]‐ <text:line-break/><text:span text:style-name="T1"> </text:span><text:span text:style-name="T2">(77/31) </text:span> ϣⲱⲡⲉ ⲛ̅ⲉⲗⲉ̣ⲩ̣[ⲑ]ⲉⲣ̣[ⲟⲥ] ⲧ̣ⲁⲅⲁⲡⲏ [ⲙⲁⲥϫⲉ] <text:line-break/><text:span text:style-name="T1"> </text:span><text:span text:style-name="T2">(77/32) </text:span> ⲗⲁⲁⲩ ϫⲉ ⲡⲱⲥ̣ [ⲡⲉ ...]ⲟⲓ[......] <text:line-break/><text:span text:style-name="T1"> </text:span><text:span text:style-name="T2">(77/33) </text:span> ⲡⲱⲥ ⲡⲉ ⲙⲁⲥϫ̣[ⲟⲟⲥ ϫⲉ ⲡⲁⲉⲓ ⲡⲱⲉⲓ ⲡⲉ] <text:line-break/><text:span text:style-name="T1"> </text:span><text:span text:style-name="T2">(77/34) </text:span> ⲏ ⲡⲁⲉⲓ ⲡⲱⲉⲓ ⲡⲉ ⲁ̣[ⲗⲗⲁ ⲛ]ⲟ̣ⲩ̣[ⲉⲓ ⲧⲏⲣⲟⲩ] <text:line-break/><text:span text:style-name="T1"> </text:span><text:span text:style-name="T2">(77/35) </text:span> ⲛⲟⲩⲕ’ ⲛⲉ ⲧⲁⲅⲁⲡⲏ ⲙ̣̅ⲡⲛⲉⲩⲙ̣[ⲁⲧⲓⲕⲏ] <text:line-break/><text:span text:style-name="T1"> </text:span><text:span text:style-name="T2">(77/36) </text:span> ⲟⲩⲏⲣⲡ’ ⲧⲉ ϩⲓ ⲥⲧⲟⲉⲓ ⲥⲉⲣ̅ⲁⲡⲟ̣[ⲗⲁⲩⲉ ⲙ̅]‐ <text:line-break/><text:soft-page-break/><text:span text:style-name="T1"> </text:span><text:span text:style-name="T2">(78/1) </text:span> ⲙⲟⲥ ⲧⲏⲣⲟⲩ ⲛ̅ϭ̣ⲓ̣ ⲛ̣ⲉⲧⲛⲁⲧⲟϩⲥⲟⲩ ⲙ̅ⲙⲟⲥ <text:line-break/><text:span text:style-name="T1"> </text:span><text:span text:style-name="T2">(78/2) </text:span> ⲥⲉⲣ̅ⲁⲡⲟⲗⲁⲩⲉ ϩⲱⲟⲩ ⲛ̅ϭⲓ ⲛⲉⲧ’ⲁϩⲉⲣⲁⲧⲟⲩ <text:line-break/><text:span text:style-name="T1"> </text:span><text:span text:style-name="T2">(78/3) </text:span> ⲙ̅ⲡⲟⲩⲃⲟⲗ ϩⲱⲥ ⲉⲩⲁϩⲉⲣⲁⲧⲟⲩ ⲛ̅ϭⲓ ⲛⲉⲧ’‐ <text:line-break/><text:span text:style-name="T1"> </text:span><text:span text:style-name="T2">(78/4) </text:span> ⲧⲟϩⲥ ⲛⲉⲧ’ⲧⲁϩⲥ̅ ⲛ̅ⲥⲟϭⲛ ⲉⲩϣⲁⲗⲟ ⲉⲧⲟⲩ‐ <text:line-break/><text:span text:style-name="T1"> </text:span><text:span text:style-name="T2">(78/5) </text:span> ⲱⲟⲩ ⲛ̅ⲥⲉⲃⲱⲕ’ ϣⲁⲣⲉ ⲛⲏ ⲉⲥⲉⲧⲟϩⲥ ⲁⲛ <text:line-break/><text:span text:style-name="T1"> </text:span><text:span text:style-name="T2">(78/6) </text:span> ⲙⲟⲛⲟⲛ ⲉⲩⲁϩⲉ ⲉⲣⲁⲧⲟⲩ ⲙ̅ⲡⲟⲩⲃⲁⲗ ϣⲁⲩ‐ <text:line-break/><text:span text:style-name="T1"> </text:span><text:span text:style-name="T2">(78/7) </text:span> ϭⲱ ⲟⲛ ϩⲙ̅ ⲡⲟⲩⲥϯⲃⲱⲱⲛ ⲡⲥⲁⲙⲁⲣⲓⲧⲏⲥ <text:line-break/><text:span text:style-name="T1"> </text:span><text:span text:style-name="T2">(78/8) </text:span> ⲛ̅ⲧⲁϥ’ϯ ⲗⲁⲁⲩ ⲁⲛ’ ⲁⲡⲉⲧϣⲟⲟϭⲉ ⲉⲓ ⲙⲏ’ <text:line-break/><text:span text:style-name="T1"> </text:span><text:span text:style-name="T2">(78/9) </text:span> ⲏⲣⲡ’ ϩⲓ ⲛⲉϩ ⲕⲉⲗⲁⲁⲩ ⲁⲛ ⲡⲉ ⲉⲓ ⲙⲏⲧⲓ’ ⲁ’ <text:line-break/><text:span text:style-name="T1"> </text:span><text:span text:style-name="T2">(78/10) </text:span> ⲡⲥⲟϭⲛ̅ ⲁⲩⲱ ⲁϥⲑⲉⲣⲁⲡⲉⲩⲉ ⲛⲙ̅ⲡⲗⲏⲅⲏ <text:line-break/><text:span text:style-name="T1"> </text:span><text:span text:style-name="T2">(78/11) </text:span> ⲧⲁⲅⲁⲡⲏ ⲅⲁⲣ ϩⲱⲃⲥ̅ ⲛ̅ⲟⲩⲙⲏⲏϣⲉ ⲛ̅ⲛⲟ‐ <text:line-break/><text:span text:style-name="T1"> </text:span><text:span text:style-name="T2">(78/12) </text:span> ⲃⲉ §ⲡⲉⲧⲉ ⲧⲥϩⲓⲙⲉ ⲙⲉ ⲙ̅ⲙⲟϥ’ ⲛⲉⲧ’ⲥⲛⲁ’‐ <text:line-break/><text:span text:style-name="T1"> </text:span><text:span text:style-name="T2">(78/13) </text:span> ϫⲡⲟⲟⲩ’ ⲉⲩⲉⲓⲛⲉ ⲙ̅ⲙⲟϥ’ ⲉϣⲱⲡⲉ ⲡⲉⲥ‐ <text:line-break/><text:span text:style-name="T1"> </text:span><text:span text:style-name="T2">(78/14) </text:span> ϩⲁⲉⲓ ⲉⲩⲉⲓⲛⲉ ⲙ̅ⲡⲉⲥϩⲁⲓ̈ ⲉϣⲱⲡⲉ ⲟⲩⲛⲟ‐ <text:line-break/><text:span text:style-name="T1"> </text:span><text:span text:style-name="T2">(78/15) </text:span> ⲉⲓⲕ’ ⲡⲉ’ ⲉⲩⲉⲓⲛⲉ ⲙ̅ⲡⲛⲟⲉⲓⲕ’ ⲡⲟⲗⲗⲁⲕⲓⲥ <text:line-break/><text:span text:style-name="T1"> </text:span><text:span text:style-name="T2">(78/16) </text:span> ⲉϣⲱⲡⲉ ⲟⲩⲛ̅ ⲥϩⲓⲙⲉ ⲉⲥⲛ̅ⲕⲟⲧⲕ’ ⲙⲛ̅ ⲡⲉⲥ‐ <text:line-break/><text:span text:style-name="T1"> </text:span><text:span text:style-name="T2">(78/17) </text:span> ϩⲁⲓ̈ ⲕⲁⲧⲁ ⲟⲩϩⲧⲟⲣ’ ⲉⲡⲉⲥϩⲏⲧ ⲇⲉ ϩⲓ ⲡⲛⲟ‐ <text:line-break/><text:span text:style-name="T1"> </text:span><text:span text:style-name="T2">(78/18) </text:span> ⲉⲓⲕ ⲉϣⲁⲥⲣ̅ⲕⲟⲓⲛⲱⲛⲉⲓ ⲛⲙ̅ⲙⲁϥ’ ⲡⲉⲧ’‐ <text:line-break/><text:span text:style-name="T1"> </text:span><text:span text:style-name="T2">(78/19) </text:span> ⲥⲁⲙⲁⲥⲧϥ’ ϣⲁⲥⲙⲁⲥⲧϥ’ ⲉϥⲓⲛⲉ ⲙ̅ⲡⲛⲟ‐ <text:line-break/><text:span text:style-name="T1"> </text:span><text:span text:style-name="T2">(78/20) </text:span> ⲉⲓⲕ’ ⲛ̅ⲧⲱⲧⲛ̅ ⲇⲉ ⲛⲉⲧϣⲟⲟⲡ’ ⲙⲛ̅ ⲡϣⲏ‐ <text:line-break/><text:span text:style-name="T1"> </text:span><text:span text:style-name="T2">(78/21) </text:span> ⲣⲉ ⲙ̅ⲡⲛⲟⲩⲧⲉ ⲙⲛ̅ⲙⲣ̅ⲣⲉ ⲡⲕⲟⲥⲙⲟⲥ’ <text:line-break/><text:span text:style-name="T1"> </text:span><text:span text:style-name="T2">(78/22) </text:span> ⲁⲗⲗⲁ ⲙⲣ̅ⲣⲉ ⲡϫⲟⲉⲓⲥ ϣⲓⲛⲁ ⲛⲉⲧⲉⲧⲛⲁ‐ <text:line-break/><text:span text:style-name="T1"> </text:span><text:span text:style-name="T2">(78/23) </text:span> ϫⲡⲟⲟⲩ ⲛⲟⲩϣⲱⲡⲉ ⲉⲩⲉⲓⲛⲉ ⲙ̅ⲡⲕⲟⲥ‐ <text:line-break/><text:span text:style-name="T1"> </text:span><text:span text:style-name="T2">(78/24) </text:span> ⲙⲟⲥ ⲁⲗⲗⲁ ⲉⲩⲛⲁϣⲱⲡⲉ ⲉⲩⲉⲓⲛⲉ ⲙ̅ⲡ‐ <text:line-break/><text:span text:style-name="T1"> </text:span><text:span text:style-name="T2">(78/25) </text:span> ϫⲟⲉⲓⲥ §ϣⲁⲣⲉ ⲡⲣⲱⲙⲉ ⲧⲱϩ ⲙⲛ̅ ⲡⲣⲱⲙⲉ <text:line-break/><text:span text:style-name="T1"> </text:span><text:span text:style-name="T2">(78/26) </text:span> ϣ̣ⲁⲣⲉ ⲡϩⲧⲟ ⲧⲱϩ ⲙⲛ̅ ⲡϩⲧⲟ ϣⲁⲣⲉ ⲡⲉⲓ‐ <text:line-break/><text:span text:style-name="T1"> </text:span><text:span text:style-name="T2">(78/27) </text:span> [ⲱ ⲧ]ⲱϩ ⲙⲛ̅ ⲡⲉⲓⲱ ⲛ̅ⲅⲉⲛⲟⲥ ⲛⲉϣⲁⲩⲧⲱϩ <text:line-break/><text:span text:style-name="T1"> </text:span><text:span text:style-name="T2">(78/28) </text:span> [ⲙⲛ̅] ⲛⲟⲩϣⲃⲣ̅ⲅⲉⲛⲟⲥ ⲧⲁⲉⲓ ⲧⲉ ⲑⲉ ⲉϣⲁ’‐ <text:line-break/><text:span text:style-name="T1"> </text:span><text:span text:style-name="T2">(78/29) </text:span> [ⲣⲉ] ⲡ̣ⲡⲛ̅ⲁ̅ ⲧⲱϩ ⲙⲛ̅ ⲡⲡ̅ⲛⲁ̅ ⲁⲩⲱ ⲡⲗⲟ‐ <text:line-break/><text:span text:style-name="T1"> </text:span><text:span text:style-name="T2">(78/30) </text:span> [ⲅⲟⲥ] ϣⲁϥⲣ̅ⲕ̣[ⲟ]ⲓ̣ⲛⲱ̣[ⲛ]ⲉⲓ ⲙⲛ̅ ⲡⲗⲟⲅⲟⲥ <text:line-break/><text:span text:style-name="T1"> </text:span><text:span text:style-name="T2">(78/31) </text:span> [ⲁⲩⲱ ⲡⲟ]ⲩⲟ̣[ⲉⲓⲛ ϣⲁ]ϥ̣ⲣ̅ⲕⲟⲓⲛⲱⲛⲉⲓ <text:line-break/><text:span text:style-name="T1"> </text:span><text:span text:style-name="T2">(78/32) </text:span> [ⲙⲛ̅ ⲡⲟⲩⲟⲉⲓⲛ’ ⲉⲕ]ϣ̣ⲁϣⲱⲡⲉ ⲣ̅ⲣⲱⲙⲉ <text:line-break/><text:span text:style-name="T1"> </text:span><text:span text:style-name="T2">(78/33) </text:span> [ⲡⲣⲱⲙ]ⲉ̣ ⲡ̣ⲉ̣[ⲧⲛⲁ]ⲙ̣ⲉⲣⲓⲧⲕ’ ⲉⲕϣⲁϣⲱⲡⲉ <text:line-break/><text:span text:style-name="T1"> </text:span><text:span text:style-name="T2">(78/34) </text:span> [ⲙ̅ⲡ̅ⲛ̅ⲁ̅] ⲡⲡ̅ⲛⲁ̅ ⲡⲉⲧⲛⲁϩⲱⲧⲣ̅ ⲉⲣⲟⲕ’ ⲉⲕ’‐ <text:line-break/><text:span text:style-name="T1"> </text:span><text:span text:style-name="T2">(78/35) </text:span> [ϣⲁⲛϣ]ⲱⲡⲉ ⲛ̅ⲗⲟⲅⲟⲥ ⲡⲗⲟⲅⲟⲥ ⲡⲉⲧ’‐ <text:line-break/><text:span text:style-name="T1"> </text:span><text:span text:style-name="T2">(79/1) </text:span> ⲛⲁⲧⲱϩ ⲛⲙ̅ⲙⲁⲕ’ ⲉ[ⲕ]ϣⲁⲛϣⲱⲡⲉ ⲛ̅ⲟⲩ‐ <text:line-break/><text:span text:style-name="T1"> </text:span><text:span text:style-name="T2">(79/2) </text:span> ⲟⲉⲓⲛ ⲡⲟⲩⲟⲉⲓⲛ ⲡⲉⲧⲛⲁⲣ̅ⲕⲟⲓⲛⲱⲛⲉⲓ <text:line-break/><text:span text:style-name="T1"> </text:span><text:span text:style-name="T2">(79/3) </text:span> ⲛⲙ̅ⲙⲁⲕ’ ⲉⲕ’ϣⲁⲛϣⲱⲡⲉ ⲛ̅ⲛⲁ ⲡⲥⲁ ⲛ‐ <text:line-break/><text:span text:style-name="T1"> </text:span><text:span text:style-name="T2">(79/4) </text:span> ϩⲣⲉ ⲛⲁ ⲡⲥⲁ ⲛϩⲣⲉ ⲛⲁⲙ̅ⲧⲟⲛ’ ⲙ̅ⲙⲟⲟⲩ’ <text:line-break/><text:span text:style-name="T1"> </text:span><text:span text:style-name="T2">(79/5) </text:span> ⲉϩⲣⲁⲓ̈ ⲉϫⲱⲕ’ ⲉⲕϣⲁⲛϣⲱⲡⲉ ⲛ̅ϩⲧⲟ <text:line-break/><text:span text:style-name="T1"> </text:span><text:span text:style-name="T2">(79/6) </text:span> ⲏ ⲛ̅ⲉⲓⲱ ⲏ ⲙ̅ⲙⲁⲥⲉ ⲏ ⲛ̅ⲟⲩϩⲟⲟⲣ’ ⲏ ⲛⲉ‐ <text:line-break/><text:span text:style-name="T1"> </text:span><text:span text:style-name="T2">(79/7) </text:span> ⲥⲟⲟⲩ ⲏ ϭⲉ ϩⲛ̅ ⲛⲉⲑⲏⲣⲓⲟⲛ ⲉⲧⲛ̅ⲡⲥⲁ ⲛ‐ <text:line-break/><text:span text:style-name="T1"> </text:span><text:span text:style-name="T2">(79/8) </text:span> ⲃⲟⲗ ⲙⲛ̅ ⲛⲉⲧⲙ̅ⲡⲥⲁ ⲙⲡⲓⲧⲛ̅ ϥⲛⲁϣⲙⲉ‐ <text:line-break/><text:span text:style-name="T1"> </text:span><text:span text:style-name="T2">(79/9) </text:span> ⲣⲓⲧⲕ’ ⲁⲛ ⲟⲩⲧⲉ ⲡⲣⲱⲙⲉ ⲟⲩⲧⲉ ⲡⲡⲛ̅ⲁ̅ ⲟⲩ‐ <text:line-break/><text:span text:style-name="T1"> </text:span><text:span text:style-name="T2">(79/10) </text:span> ⲧⲉ ⲡⲗⲟⲅⲟⲥ ⲟⲩⲧⲉ ⲡⲟⲩⲟⲉⲓⲛ ⲟⲩⲧⲉ ⲛⲁ‐ <text:line-break/><text:span text:style-name="T1"> </text:span><text:span text:style-name="T2">(79/11) </text:span> ⲡⲥⲁ ⲛⲧⲡⲉ ⲟⲩⲧⲉ ⲛⲁ ⲡⲥⲁ ⲛϩⲟⲩⲛ ⲥⲉ‐ <text:line-break/><text:span text:style-name="T1"> </text:span><text:span text:style-name="T2">(79/12) </text:span> ⲛⲁϣⲙ̅ⲧⲟⲛ’ ⲙ̅ⲙⲟⲟⲩ ⲁⲛ’ ϩⲣⲁⲓ̈ ⲛ̅ϩⲏⲧⲕ’ <text:line-break/><text:soft-page-break/><text:span text:style-name="T1"> </text:span><text:span text:style-name="T2">(79/13) </text:span> ⲁⲩⲱ ⲙⲛ̅ⲧⲁⲕ’ ⲙⲉⲣⲟⲥ ϩⲣⲁⲓ̈ ⲛ̅ϩⲏⲧⲟⲩ §ⲡⲉ‐ <text:line-break/><text:span text:style-name="T1"> </text:span><text:span text:style-name="T2">(79/14) </text:span> ⲧⲟ ⲛ̅ϩⲙϩ̅ⲁ̅ⲗ̅ ⲉϩⲛⲁϥ’ ⲁⲛ ϥⲛⲁϣⲣ̅ⲉⲗⲉⲩ‐ <text:line-break/><text:span text:style-name="T1"> </text:span><text:span text:style-name="T2">(79/15) </text:span> ⲑⲉⲣⲟⲥ ⲡⲉⲛⲧⲁϩⲣ̅ⲉⲗⲉⲩⲑⲉⲣⲟⲥ ⲙ̅ⲡⲉϩ‐ <text:line-break/><text:span text:style-name="T1"> </text:span><text:span text:style-name="T2">(79/16) </text:span> ⲙⲟⲧ’ ⲙ̅ⲡⲉϥϫⲟⲉⲓⲥ ⲁⲩⲱ ⲁϥⲧⲁϥϥ’ ⲉⲃⲟⲗ <text:line-break/><text:span text:style-name="T1"> </text:span><text:span text:style-name="T2">(79/17) </text:span> ⲟⲩⲁⲁϥ’ ⲁⲩⲙⲛ̅ⲧϩⲙ̅ϩ̅ⲁ̅ⲗ̅ ⲟⲩⲕⲉⲧⲓ ϥⲛⲁϣ‐ <text:line-break/><text:span text:style-name="T1"> </text:span><text:span text:style-name="T2">(79/18) </text:span> ⲣ̅ⲉⲗⲉⲩⲑⲉⲣⲟⲥ §ⲧⲙ̅ⲛ̅ⲧⲟⲩⲟⲉⲓⲉ ⲙ̅ⲡⲕⲟⲥ‐ <text:line-break/><text:span text:style-name="T1"> </text:span><text:span text:style-name="T2">(79/19) </text:span> ⲙⲟⲥ ϩⲓⲧⲛ̅ ϥⲧⲟⲟⲩ ⲛ̅ⲉⲓⲇⲟⲥ ϣⲁⲩⲟⲗⲟⲩ <text:line-break/><text:span text:style-name="T1"> </text:span><text:span text:style-name="T2">(79/20) </text:span> ⲉϩⲟⲩⲛ ⲁⲧⲁⲡⲟⲑⲏⲕⲏ ϩⲓⲧⲛ̅ ⲟⲩⲙⲟⲟⲩ <text:line-break/><text:span text:style-name="T1"> </text:span><text:span text:style-name="T2">(79/21) </text:span> ⲙⲛ̅ⲛⲟⲩⲕⲁϩ ⲙⲛ̅ⲛⲟⲩⲡⲛ̅ⲁ̅ ⲙⲛ̅ⲛⲟⲩⲟⲉⲓⲛ <text:line-break/><text:span text:style-name="T1"> </text:span><text:span text:style-name="T2">(79/22) </text:span> ⲁⲩⲱ ⲧⲙ̅ⲛ̅ⲧ̅ⲟⲩⲉⲓⲉ ⲙ̅ⲡⲛⲟⲩⲧⲉ ⲧⲉⲉⲓϩⲉ <text:line-break/><text:span text:style-name="T1"> </text:span><text:span text:style-name="T2">(79/23) </text:span> ⲟⲛ ϩⲓⲧⲛ̅ ϥⲧⲟⲟⲩ ϩⲓⲧⲛ̅ ⲟⲩⲡⲓⲥⲧⲓⲥ ⲙⲛ̅‐ <text:line-break/><text:span text:style-name="T1"> </text:span><text:span text:style-name="T2">(79/24) </text:span> ⲛⲟⲩϩⲉⲗⲡⲓⲥ ⲙⲛ̅ⲛⲟⲩⲁⲅⲁⲡⲏ ⲙⲛ̅ ⲟⲩ‐ <text:line-break/><text:span text:style-name="T1"> </text:span><text:span text:style-name="T2">(79/25) </text:span> ⲅⲛⲱⲥⲓⲥ ⲡⲛ̅ⲕⲁϩ ⲧⲉ ⲧ’ⲡⲓⲥⲧⲓⲥ ⲧⲁⲓ̈ ⲉⲛ’‐ <text:line-break/><text:span text:style-name="T1"> </text:span><text:span text:style-name="T2">(79/26) </text:span> ϫⲉ ⲛⲟⲩⲛⲉ ϩⲣⲁⲓ̈ ⲛ̅ϩⲏⲧⲥ̅ ⲡⲙⲟ[ⲟ]ⲩ̣ [ⲇⲉ] <text:line-break/><text:span text:style-name="T1"> </text:span><text:span text:style-name="T2">(79/27) </text:span> ⲧⲉ ⲑⲉⲗⲡⲓⲥ ⲉⲃⲟⲗ ϩⲓⲧⲟⲟⲧⲥ̅ ⲉ[ⲛⲥⲟ]‐ <text:line-break/><text:span text:style-name="T1"> </text:span><text:span text:style-name="T2">(79/28) </text:span> ⲉⲓϣ ⲡⲡⲛ̅ⲁ̅ ⲧⲉ ⲧⲁⲅⲁⲡⲏ ⲉⲃⲟⲗ [ϩⲓⲧⲟ]‐ <text:line-break/><text:span text:style-name="T1"> </text:span><text:span text:style-name="T2">(79/29) </text:span> ⲧⲟϥ’ ⲉⲛⲁⲩⲝⲁⲛⲉ ⲡⲟⲩⲟⲉⲓⲛ ⲇ[ⲉ ⲧⲉ] <text:line-break/><text:span text:style-name="T1"> </text:span><text:span text:style-name="T2">(79/30) </text:span> ⲧⲅⲛⲱⲥⲓⲥ ⲉⲃⲟ[ⲗ ϩ]ⲓ̣ⲧ̣[ⲟⲟ]ⲧⲥ̅ ⲧⲛ̣̅ⲡ[ⲱϩ’] <text:line-break/><text:span text:style-name="T1"> </text:span><text:span text:style-name="T2">(79/31) </text:span> ⲧⲭⲁⲣⲓⲥ ⲥⲟ ⲛ̅ϥ[ⲧⲟⲟⲩ ⲙ̅]ⲙ[ⲉⲓⲛⲉ ⲥⲟ ⲣ̅]‐ <text:line-break/><text:span text:style-name="T1"> </text:span><text:span text:style-name="T2">(79/32) </text:span> ⲣⲙⲛ̅ⲕⲁϩ ⲥⲟ ⲣ̅ⲣ[ⲙ̅ⲙ̅ⲡⲉ ......] <text:line-break/><text:span text:style-name="T1"> </text:span><text:span text:style-name="T2">(79/33) </text:span> ⲧⲡⲉ ⲛ̅ⲧⲉ ⲧⲡⲉ ⲁⲩ[..]ϩⲛ̣̅ [..] §[ⲟⲩⲙⲁⲕⲁ]‐ <text:line-break/><text:span text:style-name="T1"> </text:span><text:span text:style-name="T2">(79/34) </text:span> ⲣⲓⲟⲥ ⲡⲉ ⲡⲁⲉⲓ ⲉⲙ’ⲡⲉϥⲗ̅ⲗ[.... ⲛ̅] <text:line-break/><text:span text:style-name="T1"> </text:span><text:span text:style-name="T2">(80/1) </text:span> ⲛⲟⲩⲯⲩⲭⲏ ⲡⲁⲉⲓ ⲡⲉ ⲓⲥ̅ ⲡⲭ̅ⲥ̅ ⲁϥⲣ̅ⲁⲡⲁⲛ‐ <text:line-break/><text:span text:style-name="T1"> </text:span><text:span text:style-name="T2">(80/2) </text:span> ⲧⲁ ⲙ̅ⲡⲙⲁ ⲧⲏⲣϥ’ ⲁⲩⲱ ⲙ̅ⲡⲉϥⲣ̅ⲃⲁⲣⲉⲓ ⲗ̅ⲗⲁⲁⲩ <text:line-break/><text:span text:style-name="T1"> </text:span><text:span text:style-name="T2">(80/3) </text:span> ⲉⲧⲃⲉ ⲡⲁⲉⲓ’ ⲟⲩⲙⲁⲕⲁⲣⲓⲟⲥ ⲡⲉ ⲡⲁⲉⲓ ⲛ̅ⲧⲉⲉⲓ‐ <text:line-break/><text:span text:style-name="T1"> </text:span><text:span text:style-name="T2">(80/4) </text:span> ⲙⲓⲛⲉ ϫⲉ ⲟⲩⲧⲉⲗⲉⲓⲟⲥ ⲣ̅ⲣⲱⲙⲉ ⲡⲉ ⲡⲁⲉⲓ ⲅⲁⲣ’ <text:line-break/><text:span text:style-name="T1"> </text:span><text:span text:style-name="T2">(80/5) </text:span> ⲡⲗⲟⲅⲟⲥ ϫⲛⲟⲩⲛ’ ⲙ̅ⲙⲟⲛ ⲉⲣⲟϥ’ ϩⲱⲥ 〈ⲥ〉ⲙⲟⲕϩ <text:line-break/><text:span text:style-name="T1"> </text:span><text:span text:style-name="T2">(80/6) </text:span> ⲁⲥⲉϩⲉ ⲡⲁⲉⲓ ⲉⲣⲁⲧϥ’ ⲡⲱⲥ ⲧⲛ̅ⲛⲁϣⲣ̅ⲕⲁⲧⲟⲣ‐ <text:line-break/><text:span text:style-name="T1"> </text:span><text:span text:style-name="T2">(80/7) </text:span> ⲑⲟⲩ ⲙ̅ⲡⲉⲉⲓⲛⲟϭ ⲡⲱⲥ ⲉϥⲛⲁϯ ⲁⲛⲁⲡⲁⲩ‐ <text:line-break/><text:span text:style-name="T1"> </text:span><text:span text:style-name="T2">(80/8) </text:span> ⲥⲓⲥ ⲛ̅ⲟⲩⲟⲛ’ ⲛⲓⲙ ϩⲁ ⲧⲉϩⲏ ⲛ̅ϩⲱⲃ ⲛⲓⲙ’ ϣϣⲉ <text:line-break/><text:span text:style-name="T1"> </text:span><text:span text:style-name="T2">(80/9) </text:span> ⲁⲛ ⲉⲗ̅ⲗⲩⲡⲉⲓ ⲗ̅ⲗⲁⲁⲩ ⲉⲓⲧⲉ ⲛⲟϭ ⲉⲓⲧⲉ ⲕⲟⲩⲉⲓ <text:line-break/><text:span text:style-name="T1"> </text:span><text:span text:style-name="T2">(80/10) </text:span> ⲏ ⲁⲡⲓⲥⲧⲟⲥ ⲏ ⲡⲓⲥⲧⲟⲥ ⲉⲓⲧⲁ ⲁϯ ⲁⲛⲁⲡⲁⲩⲥⲓⲥ <text:line-break/><text:span text:style-name="T1"> </text:span><text:span text:style-name="T2">(80/11) </text:span> ⲛ̅ⲛⲉⲧⲙ̅ⲧⲟⲛ’ ⲙ̅ⲙⲟⲟⲩ ϩⲛ̅ ⲛⲉⲧⲛⲁⲛⲟⲩⲟⲩ <text:line-break/><text:span text:style-name="T1"> </text:span><text:span text:style-name="T2">(80/12) </text:span> ⲟⲩⲛ̅ ϩⲟⲉⲓⲛⲉ ⲉⲧⲟⲩⲛⲟϥⲣⲉ ⲧⲉ ⲉϯ ⲁⲛⲁ‐ <text:line-break/><text:span text:style-name="T1"> </text:span><text:span text:style-name="T2">(80/13) </text:span> ⲡⲁⲩⲥⲓⲥ ⲙ̅ⲡⲉⲧ’ϣⲟⲟⲡ’ ⲕⲁⲗⲱⲥ ⲡⲉϯⲣⲉ <text:line-break/><text:span text:style-name="T1"> </text:span><text:span text:style-name="T2">(80/14) </text:span> ⲙ̅ⲡⲉⲧⲛⲁⲛⲟⲩϥ’ ⲙⲛ̅ ϭⲟⲙ’ ⲙ̅ⲙⲟϥ ⲛ̅ϥϯ <text:line-break/><text:span text:style-name="T1"> </text:span><text:span text:style-name="T2">(80/15) </text:span> ⲁⲛⲁⲡⲁⲩⲥⲓⲥ ⲛ̅ⲛⲁⲉⲓ 〈ϥ〉ϥⲓ ⲅⲁⲣ ⲁⲛ’ ⲙ̅ⲡⲉⲧⲉϩ‐ <text:line-break/><text:span text:style-name="T1"> </text:span><text:span text:style-name="T2">(80/16) </text:span> ⲛⲁϥ’ ⲙⲛ̅ ϭⲟⲙ ⲇⲉ ⲙ̅ⲙⲟϥ ⲁⲗⲗⲩⲡⲉⲓ’ ⲉϥ’‐ <text:line-break/><text:span text:style-name="T1"> </text:span><text:span text:style-name="T2">(80/17) </text:span> ⲧⲙ̅ⲧⲣⲟⲩⲣ̅ⲑⲗⲓⲃⲉ ⲙ̅ⲙⲟⲟⲩ ⲁⲗⲗⲁ ⲡⲉⲧϣⲱ‐ <text:line-break/><text:span text:style-name="T1"> </text:span><text:span text:style-name="T2">(80/18) </text:span> ⲡⲉ ⲕⲁⲗⲱⲥ ϩⲛ̅ⲥⲟⲡ’ ϣⲁϥ’ⲗ̅ⲗⲩⲡⲉⲓ ⲙ̅ⲙⲟ‐ <text:line-break/><text:span text:style-name="T1"> </text:span><text:span text:style-name="T2">(80/19) </text:span> ⲟⲩ ϥϣⲟⲟⲡ’ ⲁⲛ’ ⲛ̅ⲧⲉⲉⲓϩⲉ ⲁⲗⲗⲁ ⲧⲟⲩⲕⲁ‐ <text:line-break/><text:span text:style-name="T1"> </text:span><text:span text:style-name="T2">(80/20) </text:span> ⲕⲓⲁ ⲧⲉ ⲉⲧⲣ̅ⲗⲩⲡⲉⲓ ⲙ̅ⲙⲟⲟⲩ ⲡⲉⲧⲉⲩⲛ̅ⲧⲁϥ’ <text:line-break/><text:span text:style-name="T1"> </text:span><text:span text:style-name="T2">(80/21) </text:span> ⲙ̅ⲙⲁⲩ ⲛ̅ⲧⲫⲩⲥⲓⲥ ϥϯ ⲟⲩⲛⲟϥ ⲙ̅ⲡⲉⲧⲛⲁ‐ <text:line-break/><text:span text:style-name="T1"> </text:span><text:span text:style-name="T2">(80/22) </text:span> ⲛⲟⲩϥ’ ϩⲟⲉⲓⲛⲉ ⲇⲉ ⲉⲃⲟⲗ ϩⲛ̅ ⲡⲁⲉⲓ ⲥⲉⲗ̅‐ <text:line-break/><text:span text:style-name="T1"> </text:span><text:span text:style-name="T2">(80/23) </text:span> ⲗⲩⲡⲉⲓ ⲕⲁⲕⲱⲥ §ⲟⲩϫⲉⲥϩⲛ̅ⲛⲏⲉⲓ’ ⲁϥϫⲡⲉ <text:line-break/><text:span text:style-name="T1"> </text:span><text:span text:style-name="T2">(80/24) </text:span> ⲛ̅ⲕⲁ ⲛⲓⲙ ⲉⲓⲧⲉ ϣⲏⲣⲉ ⲉⲓⲧⲉ ϩⲙϩ̅ⲁ̅ⲗ̅ ⲉⲓⲧⲉ <text:line-break/><text:span text:style-name="T1"> </text:span><text:span text:style-name="T2">(80/25) </text:span> ⲧⲃⲛⲏ ⲉⲓⲧⲉ ⲟⲩϩⲟⲣ’ ⲉⲓⲧⲉ ⲣⲓⲣ’ ⲉⲓⲧⲉ ⲥⲟⲩⲟ’ <text:line-break/><text:soft-page-break/><text:span text:style-name="T1"> </text:span><text:span text:style-name="T2">(80/26) </text:span> [ⲉⲓⲧⲉ] ⲉ̣ⲓⲱⲧ’ ⲉⲓⲧⲉ ⲧⲱϩ ⲉⲓⲧⲉ ⲭⲟⲣⲧⲟⲥ ⲉⲓⲧⲉ <text:line-break/><text:span text:style-name="T1"> </text:span><text:span text:style-name="T2">(80/27) </text:span> [...]. ⲉⲓⲧⲉ ⲁϥ ⲁⲩⲱ ⲃⲁⲗⲁⲛⲟⲥ ⲟⲩⲥⲁⲃⲉ <text:line-break/><text:span text:style-name="T1"> </text:span><text:span text:style-name="T2">(80/28) </text:span> [ⲇⲉ ⲡ]ⲉ ⲁⲩⲱ ⲁϥⲉⲓⲙⲉ ⲛ̅ⲧ’ⲧⲣⲟⲫⲏ ⲙ̅ⲡⲟⲩⲁ <text:line-break/><text:span text:style-name="T1"> </text:span><text:span text:style-name="T2">(80/29) </text:span> [ⲡⲟⲩⲁ] ⲛ̅ϣⲏⲣ̣[ⲉ] ⲙ̣ⲉⲛ̣’ ⲁ̣ϥⲕⲉ ⲁⲣⲧⲟⲥ ϩⲁⲣⲱ‐ <text:line-break/><text:span text:style-name="T1"> </text:span><text:span text:style-name="T2">(80/30) </text:span> [ⲟⲩ ....]ⲁ̣ⲁ[.... ⲛ̅]ϩ̣ⲙϩ̅ⲁ̅ⲗ̅ ⲇⲉ ⲁϥⲕⲉ ⲕⲓ‐ <text:line-break/><text:span text:style-name="T1"> </text:span><text:span text:style-name="T2">(80/31) </text:span> [.....ϩⲁⲣⲱⲟⲩ ϩⲓ ⲉ]ⲃⲣⲉ ⲁⲩⲱ ⲛ̅ⲧⲃⲛⲟⲟⲩ <text:line-break/><text:span text:style-name="T1"> </text:span><text:span text:style-name="T2">(80/32) </text:span> [ⲁϥ’ⲛⲉϫ’ ⲉⲓ]ⲱ̣[ⲧ ϩ]ⲁ̣ⲣⲱⲟⲩ ϩⲓ ⲧⲱϩ ϩⲓ ⲭⲟⲣ’‐ <text:line-break/><text:span text:style-name="T1"> </text:span><text:span text:style-name="T2">(80/33) </text:span> [ⲧⲟⲥ’ ⲛ̅ⲟⲩ]ϩⲟⲟⲣ̅ ⲁϥⲛⲉϫ ⲕⲉⲉⲥ ϩⲁⲣⲱⲟⲩ <text:line-break/><text:span text:style-name="T1"> </text:span><text:span text:style-name="T2">(80/34) </text:span> [ⲁⲩⲱ ⲣ̅ⲣⲓⲣ ⲁ]ϥ̣ⲛⲉϫ’ ⲃⲁⲗⲁⲛⲟⲥ ϩⲁⲣⲱⲟⲩ’ <text:line-break/><text:span text:style-name="T1"> </text:span><text:span text:style-name="T2">(81/1) </text:span> ϩⲓ̈ ⲙⲁⲙⲟⲩ ⲛ̅ⲟⲉⲓⲕ’ ⲧⲁⲉⲓ ⲧⲉ ⲑⲉ ⲙ̅ⲡⲙⲁⲑⲏ’‐ <text:line-break/><text:span text:style-name="T1"> </text:span><text:span text:style-name="T2">(81/2) </text:span> ⲧⲏⲥ ⲙ̅ⲡⲛⲟⲩⲧⲉ ⲉϣⲱⲡⲉ ⲟⲩⲥⲁⲃⲉ ⲡⲉ ⲉϥ’‐ <text:line-break/><text:span text:style-name="T1"> </text:span><text:span text:style-name="T2">(81/3) </text:span> ⲁⲓⲥⲑⲁⲛⲉ ⲛ̅ⲧⲙ̅ⲛ̅ⲧ̅ⲙⲁⲑⲏⲧⲏⲥ ⲙ̅ⲙⲟⲣ’‐ <text:line-break/><text:span text:style-name="T1"> </text:span><text:span text:style-name="T2">(81/4) </text:span> ⲫⲏ ⲛ̅ⲥⲱⲙⲁⲧⲓⲕⲏ ⲥⲉⲛⲁⲣ̅ⲁⲡⲁⲧⲁ ⲁⲛ’ ⲙ̅‐ <text:line-break/><text:span text:style-name="T1"> </text:span><text:span text:style-name="T2">(81/5) </text:span> ⲙⲟϥ’ ⲁⲗⲗⲁ’ ⲉϥⲛⲁϭⲱϣⲧ’ ⲛ̅ⲥⲁ ⲧⲇⲓⲁⲑⲉ‐ <text:line-break/><text:span text:style-name="T1"> </text:span><text:span text:style-name="T2">(81/6) </text:span> ⲥⲓⲥ ⲛ̅ⲧⲉϥ’ⲯⲩⲭⲏ ⲙ̅ⲡⲟⲩⲁ ⲡⲟⲩⲁ ⲛ̅ϥϣⲁ‐ <text:line-break/><text:span text:style-name="T1"> </text:span><text:span text:style-name="T2">(81/7) </text:span> ϫⲉ ⲛⲙ̅ⲙⲁϥ’ ⲟⲩⲛ̅ ϩⲁϩ ⲛ̅ⲑⲏⲣⲓⲟⲛ ϩⲙ̅ ⲡⲕⲟⲥ‐ <text:line-break/><text:span text:style-name="T1"> </text:span><text:span text:style-name="T2">(81/8) </text:span> ⲙⲟⲥ ⲉⲩⲟ ⲙ̅ⲙⲟⲣⲫⲏ ⲣ̅ⲣⲱⲙⲉ ⲛⲁⲉⲓ ⲉϥ’‐ <text:line-break/><text:span text:style-name="T1"> </text:span><text:span text:style-name="T2">(81/9) </text:span> ϣⲁⲥⲟⲩⲱⲛⲟⲩ ⲣ̅ⲣⲓⲣ ⲙⲉⲛ’ ϥⲛⲁⲛⲉϫ’ ⲃⲁ‐ <text:line-break/><text:span text:style-name="T1"> </text:span><text:span text:style-name="T2">(81/10) </text:span> ⲗⲁⲛⲟⲥ ⲉⲣⲟⲟⲩ ⲛ̅ⲧⲃⲛⲟⲟⲩ ⲇⲉ ϥⲛⲁⲛⲉϫ’ <text:line-break/><text:span text:style-name="T1"> </text:span><text:span text:style-name="T2">(81/11) </text:span> ⲉⲓⲱⲧ’ ⲉⲣⲟⲟⲩ ϩⲓ ⲧⲱϩ ϩⲓ ⲭⲟⲣⲧⲟⲥ ⲛ̅ⲟⲩ‐ <text:line-break/><text:span text:style-name="T1"> </text:span><text:span text:style-name="T2">(81/12) </text:span> ϩⲟⲟⲣ’ ϥⲛⲁⲛⲉϫ ⲕⲁⲁⲥ ⲉⲣⲟⲟⲩ ⲛ̅ϩⲙ̅ϩ̅ⲁ̅ⲗ̅ <text:line-break/><text:span text:style-name="T1"> </text:span><text:span text:style-name="T2">(81/13) </text:span> ϥⲛⲁϯ ⲛⲁⲩ ⲛ̅ϣⲟⲣⲡ’ ⲛ̅ϣⲏⲣⲉ ϥⲛⲁϯ ⲛⲁⲩ <text:line-break/><text:span text:style-name="T1"> </text:span><text:span text:style-name="T2">(81/14) </text:span> ⲛ̅ⲧⲉⲗⲉⲓⲟⲛ §ϥϣⲟⲟⲡ’ ⲛ̅ϭⲓ ⲡϣⲏⲣⲉ ⲙ̅ⲡⲣⲱ‐ <text:line-break/><text:span text:style-name="T1"> </text:span><text:span text:style-name="T2">(81/15) </text:span> ⲙⲉ ⲁⲩⲱ ϥϣⲟⲟⲡ’ ⲛ̅ϭⲓ ⲡϣⲏⲣⲉ ⲙ̅ⲡϣⲏ‐ <text:line-break/><text:span text:style-name="T1"> </text:span><text:span text:style-name="T2">(81/16) </text:span> ⲣⲉ ⲙ̅ⲡⲣⲱⲙⲉ ⲡϫⲟⲉⲓⲥ ⲡⲉ ⲡϣⲏⲣⲉ ⲙ̅‐ <text:line-break/><text:span text:style-name="T1"> </text:span><text:span text:style-name="T2">(81/17) </text:span> ⲡⲣⲱⲙⲉ ⲁⲩⲱ ⲡϣⲏⲣⲉ ⲙ̅ⲡϣⲏⲣⲉ’ ⲙ̅‐ <text:line-break/><text:span text:style-name="T1"> </text:span><text:span text:style-name="T2">(81/18) </text:span> ⲡⲣⲱⲙⲉ ⲡⲉ ⲡⲉⲧ’ⲥⲱⲛⲧ’ ϩⲓⲧⲙ̅ ⲡϣⲏ‐ <text:line-break/><text:span text:style-name="T1"> </text:span><text:span text:style-name="T2">(81/19) </text:span> ⲣⲉ ⲙ̅ⲡⲣⲱⲙⲉ ⲁⲡϣⲏⲣⲉ ⲙ̅ⲡⲣⲱⲙⲉ ϫⲓ <text:line-break/><text:span text:style-name="T1"> </text:span><text:span text:style-name="T2">(81/20) </text:span> ⲛ̅ⲧⲟⲟⲧϥ’ ⲙ̅ⲡⲛⲟⲩⲧⲉ ⲉⲧⲣⲉϥⲥⲱⲛⲧ’ ⲟⲩⲛ‐ <text:line-break/><text:span text:style-name="T1"> </text:span><text:span text:style-name="T2">(81/21) </text:span> ⲧⲁϥ’ ⲙ̅ⲙⲁⲩ ⲉⲧⲣⲉϥϫⲡⲟ ⲡⲉⲛⲧⲁϩϫⲓ ⲉ‐ <text:line-break/><text:span text:style-name="T1"> </text:span><text:span text:style-name="T2">(81/22) </text:span> ⲧⲣⲉϥ’ⲥⲱⲛ’ⲧ’ ⲟⲩⲥⲱⲛⲧ’ ⲡⲉ ⲡⲉⲛⲧⲁϩϫⲓ̣ <text:line-break/><text:span text:style-name="T1"> </text:span><text:span text:style-name="T2">(81/23) </text:span> ⲉϫⲡⲟ ⲟⲩϫⲡⲟ ⲡⲉ ⲡⲉⲧⲥⲱⲛⲧ ⲙⲛ̅ ϭⲟⲙ̣ <text:line-break/><text:span text:style-name="T1"> </text:span><text:span text:style-name="T2">(81/24) </text:span> ⲛ̅ϥϫⲡⲟ ⲡⲉⲧ’ϫⲡⲟ ⲟⲩⲛ̅ ϭⲟⲙ ⲛ̅ϥⲥⲱⲛⲧ̣ <text:line-break/><text:span text:style-name="T1"> </text:span><text:span text:style-name="T2">(81/25) </text:span> ⲥⲉϫⲱ ⲇⲉ ⲙ̅ⲙⲟⲥ ϫⲉ ⲡⲉⲧ’ⲥⲱⲛⲧ’ ϫⲡⲟ <text:line-break/><text:span text:style-name="T1"> </text:span><text:span text:style-name="T2">(81/26) </text:span> ⲁⲗⲗⲁ ⲡⲉϥϫⲡⲟ ⲟⲩⲥⲱⲛⲧ’ ⲡⲉ ⲉⲧ[ⲃⲉ ...] <text:line-break/><text:span text:style-name="T1"> </text:span><text:span text:style-name="T2">(81/27) </text:span> ⲛ̅ϫⲡⲟ ⲛⲉϥ’ϣⲏⲣⲉ ⲁⲛ ⲛⲉ ⲁⲗⲗⲁ ⲛ̣[.....] <text:line-break/><text:span text:style-name="T1"> </text:span><text:span text:style-name="T2">(81/28) </text:span> ⲛⲉ ⲡⲉⲧⲥⲱⲛⲧ’ ⲉϥⲣ̅ ϩⲱⲃ ϩⲛ̅ ⲟⲩ̣[ⲱⲛϩ] <text:line-break/><text:span text:style-name="T1"> </text:span><text:span text:style-name="T2">(81/29) </text:span> ⲉⲃⲟⲗ ⲁⲩⲱ ⲛ̅ⲧⲟϥ ϩⲱⲱϥ ϥⲟⲩⲟ̣[ⲛϩ ⲉ]‐ <text:line-break/><text:span text:style-name="T1"> </text:span><text:span text:style-name="T2">(81/30) </text:span> ⲃⲟⲗ’ ⲡⲉⲧϫⲡⲟ’ ⲉϥϫ̣ⲡ̣ⲟ̣ ϩⲛ̅ ⲟ̣ⲩ[ⲡⲉⲑⲏⲡ] <text:line-break/><text:span text:style-name="T1"> </text:span><text:span text:style-name="T2">(81/31) </text:span> ⲁⲩⲱ ⲛ̅ⲧⲟϥ ϥϩⲏⲡ’̣ [ⲉ]ϥ̣[ⲟ]ⲩⲁ[......] <text:line-break/><text:span text:style-name="T1"> </text:span><text:span text:style-name="T2">(81/32) </text:span> ⲑⲓⲕⲱⲛ ⲡⲉⲧ’ⲥⲱ̣[ⲛⲧ ⲟ]ⲛ ⲉϥⲥ̣[ⲱⲛⲧ ϩⲛ̅] <text:line-break/><text:span text:style-name="T1"> </text:span><text:span text:style-name="T2">(81/33) </text:span> ⲟⲩⲫⲁⲛⲉⲣⲟⲛ ⲡⲉⲧϫⲡⲟ ⲇ[ⲉ ⲉϥϫⲡⲉ] <text:line-break/><text:span text:style-name="T1"> </text:span><text:span text:style-name="T2">(81/34) </text:span> ϣⲏⲣⲉ ϩⲛ̅ ⲟⲩⲡⲉⲑⲏⲡ’ ⲙⲛ̣̅ [ⲗⲁⲁⲩ ⲛⲁϣ]‐ <text:line-break/><text:span text:style-name="T1"> </text:span><text:span text:style-name="T2">(81/35) </text:span> ⲥⲟⲟⲩⲛ ϫⲉ ⲁϣ ⲡⲉ ⲫⲟ[ⲟⲩ ⲉⲧⲉ ⲫⲟⲟⲩⲧ] <text:line-break/><text:span text:style-name="T1"> </text:span><text:span text:style-name="T2">(82/1) </text:span> ⲙⲛ̅ ⲧⲥϩⲓⲙⲉ ⲣ̅ⲕⲟⲓⲛⲱⲛⲉⲓ ⲙⲛ̅ ⲛⲟⲩⲉⲣⲏⲩ <text:line-break/><text:span text:style-name="T1"> </text:span><text:span text:style-name="T2">(82/2) </text:span> ⲉⲓ ⲙⲏ ⲛ̅ⲧⲟⲟⲩ ⲟⲩⲁⲁⲩ ⲟⲩⲙⲩⲥⲧⲏⲣⲓⲟⲛ ⲅⲁⲣ’ <text:line-break/><text:span text:style-name="T1"> </text:span><text:span text:style-name="T2">(82/3) </text:span> ⲡⲉ ⲡⲅⲁⲙⲟⲥ ⲙ̅ⲡⲕⲟⲥⲙⲟⲥ ⲛ̅ⲛⲉⲛⲧⲁϩϫⲓ <text:line-break/><text:soft-page-break/><text:span text:style-name="T1"> </text:span><text:span text:style-name="T2">(82/4) </text:span> ϩⲓⲙⲉ ⲉϣϫⲉ ⲡⲅⲁⲙⲟⲥ ⲙ̅ⲡϫⲱϩⲙ’ ϥϩⲏⲡ’ <text:line-break/><text:span text:style-name="T1"> </text:span><text:span text:style-name="T2">(82/5) </text:span> ⲡⲟⲥⲱ ⲙⲁⲗⲗⲟⲛ ⲡⲅⲁⲙⲟⲥ ⲛ̅ⲁⲧϫⲱϩⲙ’ ⲟⲩ‐ <text:line-break/><text:span text:style-name="T1"> </text:span><text:span text:style-name="T2">(82/6) </text:span> ⲙⲩⲥⲧⲏⲣⲓⲟⲛ ⲡⲉ ⲛ̅ⲁⲗⲏⲑⲉⲓⲛⲟⲛ ⲟⲩⲥⲁⲣⲕⲓ‐ <text:line-break/><text:span text:style-name="T1"> </text:span><text:span text:style-name="T2">(82/7) </text:span> ⲕⲟⲛ’ ⲁⲛ ⲡⲉ ⲁⲗⲗⲁ ⲉϥ’ⲧⲃ̅ⲃⲏⲩ ⲉϥⲏⲡ’ ⲁⲛ ⲁⲧⲉ‐ <text:line-break/><text:span text:style-name="T1"> </text:span><text:span text:style-name="T2">(82/8) </text:span> ⲡⲓⲑⲩⲙⲓⲁ ⲁⲗⲗⲁ ⲉⲡⲟⲩⲱϣ ⲉϥⲏⲡ’ ⲁⲛ’ ⲉⲡⲕⲁ‐ <text:line-break/><text:span text:style-name="T1"> </text:span><text:span text:style-name="T2">(82/9) </text:span> ⲕⲉ ⲏ ⲧⲟⲩϣⲏ ⲁⲗⲗⲁ ⲉϥⲏⲡ’ ⲉⲡⲉϩⲟⲟⲩ ⲙⲛ̅ <text:line-break/><text:span text:style-name="T1"> </text:span><text:span text:style-name="T2">(82/10) </text:span> ⲡⲟⲩⲟⲉⲓⲛ ⲟⲩⲅⲁⲙⲟⲥ ⲉϥϣⲁⲕⲱⲕⲁϩⲏⲩ <text:line-break/><text:span text:style-name="T1"> </text:span><text:span text:style-name="T2">(82/11) </text:span> ⲁϥϣⲱⲡⲉ ⲙ̅ⲡⲟⲣⲛⲉⲓⲁ ⲁⲩⲱ ⲧϣⲉⲗⲉⲉⲧ’ <text:line-break/><text:span text:style-name="T1"> </text:span><text:span text:style-name="T2">(82/12) </text:span> ⲟⲩ ⲙⲟⲛⲟⲛ ⲉⲥϣⲁϫⲓ ⲡⲥⲡⲉⲣⲙⲁ ⲛ̅ⲕⲉϩⲟ‐ <text:line-break/><text:span text:style-name="T1"> </text:span><text:span text:style-name="T2">(82/13) </text:span> ⲟⲩⲧ’ ⲁⲗⲗⲁ ⲕⲁⲛ ⲉⲥϣⲁⲛⲣ̅ ⲡⲃⲟⲗ’ ⲙ̅ⲡⲉⲥⲕⲟⲓ‐ <text:line-break/><text:span text:style-name="T1"> </text:span><text:span text:style-name="T2">(82/14) </text:span> ⲧⲱⲛ ⲛ̅ⲥⲉⲛⲁⲩ ⲉⲣⲟⲥ ⲁⲥⲡⲟⲣⲛⲉⲩⲉ ⲙⲟⲛⲟⲛ <text:line-break/><text:span text:style-name="T1"> </text:span><text:span text:style-name="T2">(82/15) </text:span> ⲙⲁⲣⲉⲥⲟⲩⲱⲛϩ ⲉⲃⲟⲗ ⲙ̅ⲡⲉⲥⲉⲓⲱⲧ’ ⲙⲛ̅ ⲧⲉⲥ‐ <text:line-break/><text:span text:style-name="T1"> </text:span><text:span text:style-name="T2">(82/16) </text:span> ⲙⲁⲁⲩ ⲙⲛ̅ ⲡϣⲃⲏⲣ’ ⲙ̅ⲡⲛⲩⲙ̅ⲫⲓⲟⲥ ⲙⲛ̅ ⲛ̅‐ <text:line-break/><text:span text:style-name="T1"> </text:span><text:span text:style-name="T2">(82/17) </text:span> ⲛ̅ϣⲏⲣⲉ ⲙ̅ⲡⲛⲩⲙ’ⲫⲓⲟⲥ ⲛⲁⲉⲓ ⲉⲥⲧⲟⲉⲓ ⲛⲁⲩ <text:line-break/><text:span text:style-name="T1"> </text:span><text:span text:style-name="T2">(82/18) </text:span> ⲉⲧⲣⲟⲩⲃⲱⲕ’ ⲉϩⲟⲩⲛ ⲙ̅ⲙⲏⲛⲉ ⲉⲡⲛⲩⲙⲫⲱⲛ <text:line-break/><text:span text:style-name="T1"> </text:span><text:span text:style-name="T2">(82/19) </text:span> ⲛ̅ⲕⲟⲟⲩⲉ ⲇⲉ ⲙⲁⲣⲟⲩⲣ̅ⲉⲡⲓⲑⲩⲙⲉⲓ ⲕⲁⲛ’ <text:line-break/><text:span text:style-name="T1"> </text:span><text:span text:style-name="T2">(82/20) </text:span> ⲉⲥⲱⲧⲙ̅ ⲉⲧⲉⲥⲥⲙⲏ ⲛ̅ⲥⲉⲣ̅ⲁⲡⲟⲗⲁⲩⲉ’ ⲙ̅‐ <text:line-break/><text:span text:style-name="T1"> </text:span><text:span text:style-name="T2">(82/21) </text:span> ⲡⲉⲥⲥⲟϭⲛ̅ ⲁⲩⲱ ⲙⲁⲣⲟⲩⲥⲟⲛϣ ⲉⲃⲟⲗ’ ϩⲛ̅ ⲛ̅‐ <text:line-break/><text:span text:style-name="T1"> </text:span><text:span text:style-name="T2">(82/22) </text:span> ⲗⲉϥⲗⲓϥⲉ ⲉⲧϩⲉ ⲉⲃⲟⲗ ϩⲓ ⲧⲣⲁⲡⲉⲍⲁ ⲛ̅ⲑⲉ ⲛ̅‐ <text:line-break/><text:span text:style-name="T1"> </text:span><text:span text:style-name="T2">(82/23) </text:span> ⲛⲟⲩϩⲟⲟⲣ’ ⲟⲩⲛ ϩⲛ̅ⲛⲩⲙ’ⲫⲓⲟⲥ ⲙⲛ̅ ϩⲛ̅‐ <text:line-break/><text:span text:style-name="T1"> </text:span><text:span text:style-name="T2">(82/24) </text:span> ⲛⲩⲙⲫⲏ ⲏⲡ’ ⲉⲡⲛⲩⲙⲫⲱⲛ ⲙⲛ̅ ⲟⲩⲁ ⲛⲁϣ‐ <text:line-break/><text:span text:style-name="T1"> </text:span><text:span text:style-name="T2">(82/25) </text:span> ⲛ̣ⲁⲩ ⲁⲡⲛⲩⲙ’ⲫⲓⲟⲥ ⲙⲛ̅ ⲧⲛⲩⲙⲫⲏ ⲉⲓ ⲙⲏ <text:line-break/><text:span text:style-name="T1"> </text:span><text:span text:style-name="T2">(82/26) </text:span> [ⲛ̅ϥϣ]ⲱⲡⲉ ⲙ̅ⲡⲁⲉⲓ §ⲛ̅ⲧⲉⲣⲉ ⲁⲃⲣⲁϩⲁⲙ’ <text:line-break/><text:span text:style-name="T1"> </text:span><text:span text:style-name="T2">(82/27) </text:span> [....] ⲉⲧⲣⲉϥⲛⲁⲩ ⲁⲡⲉⲧ’ϥⲛⲁⲛⲁⲩ ⲉⲣⲟϥ’ <text:line-break/><text:span text:style-name="T1"> </text:span><text:span text:style-name="T2">(82/28) </text:span> [ⲁϥⲥ]ⲃ̣̅ⲃⲉ ⲛ̅ⲧⲥⲁⲣⲝ’ ⲛ̅ⲧⲁⲕⲣⲟⲃⲩⲥⲧⲓⲁ ⲉϥⲧⲁ‐ <text:line-break/><text:span text:style-name="T1"> </text:span><text:span text:style-name="T2">(82/29) </text:span> [ⲙⲟ] ⲙ̣̅ⲙⲟⲛ ϫⲉ ϣϣⲉ ⲉⲧⲁⲕⲟ ⲛ̅ⲧⲥⲁⲣⲝ’ <text:line-break/><text:span text:style-name="T1"> </text:span><text:span text:style-name="T2">(82/30) </text:span> §[ⲡⲉϩⲟ]ⲩⲟ̣ ⲛ̣̅ⲧⲉ̣ [ⲡ̣]ⲕⲟ̣ⲥⲙⲟⲥ ⲉⲛ ϩⲟⲥⲟⲛ’ ⲛⲟⲩ‐ <text:line-break/><text:span text:style-name="T1"> </text:span><text:span text:style-name="T2">(82/31) </text:span> [ⲥⲁ ⲛϩⲟⲩ]ⲛ̣’ ϩⲏ[ⲡ]’ [ⲥⲉ]ⲁ̣ϩⲉⲣⲁⲧⲟⲩ’ ⲁⲩⲱ ⲥⲉⲟⲛϩ <text:line-break/><text:span text:style-name="T1"> </text:span><text:span text:style-name="T2">(82/32) </text:span> [ⲉⲩϣⲁⲛ]ⲟ̣ⲩⲱⲛ[ϩ ⲉⲃ]ⲟ̣ⲗ ⲁⲩⲙⲟⲩ ⲕⲁⲧⲁ ⲡⲡⲁ‐ <text:line-break/><text:span text:style-name="T1"> </text:span><text:span text:style-name="T2">(82/33) </text:span> [ⲣⲁⲇⲓⲅⲙ]ⲁ ⲙ̅ⲡⲣⲱⲙⲉ ⲉⲧⲟⲩⲟⲛⲉϩ ⲉⲃⲟⲗ <text:line-break/><text:span text:style-name="T1"> </text:span><text:span text:style-name="T2">(82/34) </text:span> [ⲉⲛ ϩⲟⲥⲟ]ⲛ ⲙ̅ⲙⲁϩⲧ’ ⲙ̅ⲡⲣⲱⲙⲉ ϩⲏⲡ’ ϥⲟⲛϩ <text:line-break/><text:span text:style-name="T1"> </text:span><text:span text:style-name="T2">(83/1) </text:span> ⲛ̅ϭⲓ ⲡⲣⲱⲙⲉ ⲉⲩϣⲁϭⲱⲗⲡ’ ⲛ̅ϭⲓ ⲛⲉϥⲙⲁϩⲧ’ <text:line-break/><text:span text:style-name="T1"> </text:span><text:span text:style-name="T2">(83/2) </text:span> ⲥⲉⲣ̅ ⲡⲃⲟⲗ ⲛ̅ϩⲏⲧϥ’ ϥⲛⲁⲙⲟⲩ ⲛ̅ϭⲓ ⲡⲣⲱⲙⲉ <text:line-break/><text:span text:style-name="T1"> </text:span><text:span text:style-name="T2">(83/3) </text:span> ⲧⲉⲉⲓϩⲉ ⲟⲛ ⲙ̅ⲡϣⲏⲛ ϩⲱⲥ ⲉⲧⲉϥⲛⲟⲩⲛⲉ <text:line-break/><text:span text:style-name="T1"> </text:span><text:span text:style-name="T2">(83/4) </text:span> ϩⲏⲡ’ ϣⲁϥϯ ⲟⲩⲱ ⲛ̅ϥⲗⲉϩⲏⲧ%2 ⲉⲣϣⲁ ⲧⲉϥ’‐ <text:line-break/><text:span text:style-name="T1"> </text:span><text:span text:style-name="T2">(83/5) </text:span> ⲛⲟⲩⲛⲉ ϭⲱⲗⲡ’ ⲉⲃⲟⲗ ϣⲁⲣⲉ ⲡϣⲏⲛ ϣⲟ‐ <text:line-break/><text:span text:style-name="T1"> </text:span><text:span text:style-name="T2">(83/6) </text:span> ⲟⲩⲉ ⲧⲁⲉⲓ ⲧⲉ ⲑⲉ ϩⲓ ϫⲡⲟ ⲛⲓⲙ’ ⲉⲧϩⲙ̅ ⲡⲕⲟⲥ‐ <text:line-break/><text:span text:style-name="T1"> </text:span><text:span text:style-name="T2">(83/7) </text:span> ⲙⲟⲥ ⲟⲩ ⲙⲟⲛⲟⲛ ϩⲓ ⲛⲉⲧⲟⲩⲟⲛϩ ⲉⲃⲟⲗ’ <text:line-break/><text:span text:style-name="T1"> </text:span><text:span text:style-name="T2">(83/8) </text:span> ⲁⲗⲗⲁ ϩⲓ ⲛⲉⲑⲏⲡ’ ⲉⲫ ϩⲟⲥⲟⲛ ⲅⲁⲣ ⲧⲛⲟⲩⲛⲉ <text:line-break/><text:span text:style-name="T1"> </text:span><text:span text:style-name="T2">(83/9) </text:span> ⲛ̅ⲧⲕⲁⲕⲓⲁ ϩⲏⲡ ⲥϫⲟⲟⲣ ⲉⲩϣⲁⲛⲥⲟⲩⲱⲛⲥ̅ <text:line-break/><text:span text:style-name="T1"> </text:span><text:span text:style-name="T2">(83/10) </text:span> ⲇⲉ ⲁⲥⲃⲱⲗ ⲉⲃⲟⲗ ⲉⲥϣⲁⲛⲟⲩⲱⲛϩ ⲇⲉ ⲉ‐ <text:line-break/><text:span text:style-name="T1"> </text:span><text:span text:style-name="T2">(83/11) </text:span> ⲃⲟⲗ ⲁⲥⲱϫⲛ̅ ⲉⲧⲃⲉ ⲡⲁⲉⲓ ⲡⲗⲟⲅⲟⲥ ϫⲱ ⲙ̅‐ <text:line-break/><text:span text:style-name="T1"> </text:span><text:span text:style-name="T2">(83/12) </text:span> ⲙⲟⲥ ϫⲉ ⲏⲇⲏ ⲧⲁⲝⲉⲓⲛⲏ ⲥⲙ̅ⲙⲟⲛⲧ’ ⲁⲧⲛⲟⲩ‐ <text:line-break/><text:span text:style-name="T1"> </text:span><text:span text:style-name="T2">(83/13) </text:span> ⲛⲉ ⲛ̅ⲛ̅ϣⲏⲛ ⲉⲥⲛⲁϣⲱⲱⲧ’ ⲁⲛ ⲡⲉⲧⲟⲩ‐ <text:line-break/><text:span text:style-name="T1"> </text:span><text:span text:style-name="T2">(83/14) </text:span> ⲛⲁϣⲁⲁⲧϥ’ ⲡⲁⲗⲓⲛ ϣⲁϥϯ ⲟⲩⲱ ⲁⲗⲗⲁ ⲉϣⲁ‐ <text:line-break/><text:span text:style-name="T1"> </text:span><text:span text:style-name="T2">(83/15) </text:span> ⲣⲉ ⲧⲁⲝⲉⲓⲛⲏ ⲃⲁⲗⲃⲗ̅ ⲉⲡⲓⲧⲛ̅ ⲉⲡⲉⲥⲏⲧ’ ϣⲁⲛ‐ <text:line-break/><text:span text:style-name="T1"> </text:span><text:span text:style-name="T2">(83/16) </text:span> ⲧⲉⲥⲛ̅ ⲧⲛⲟⲩⲛⲉ ⲉϩⲣⲁⲉⲓ ⲁⲓ̅ⲥ̅ ⲇⲉ ⲡⲱⲣⲕ’ ⲛ̅‐ <text:line-break/><text:soft-page-break/><text:span text:style-name="T1"> </text:span><text:span text:style-name="T2">(83/17) </text:span> ⲧⲛⲟⲩⲛⲉ ⲙ̅ⲡⲙⲁ ⲧⲏⲣϥ ϩⲛ̅ⲕⲟⲟⲩⲉ ⲇⲉ ⲕⲁ‐ <text:line-break/><text:span text:style-name="T1"> </text:span><text:span text:style-name="T2">(83/18) </text:span> ⲧⲁ ⲙⲉⲣⲟⲥ ⲁⲛⲟⲛ ϩⲱⲱⲛ ⲙⲁⲣⲉ ⲡⲟⲩⲁ <text:line-break/><text:span text:style-name="T1"> </text:span><text:span text:style-name="T2">(83/19) </text:span> ⲡⲟⲩⲁ ⲛ̅ϩⲏⲧⲛ̅ ⲙⲁⲣⲉϥⲃⲁⲗⲃⲗⲉ ⲛ̅ⲥⲁ ⲧⲛⲟⲩ̣‐ <text:line-break/><text:span text:style-name="T1"> </text:span><text:span text:style-name="T2">(83/20) </text:span> ⲛⲉ ⲛ̅ⲧⲕⲁⲕⲓⲁ’ ⲉⲧⲛ̅ϩⲣⲁⲓ̈ ⲛ̅ϩⲏⲧϥ̅ ⲛ̅ϥⲡⲟⲣⲕ̅ⲥ̣̅̅ <text:line-break/><text:span text:style-name="T1"> </text:span><text:span text:style-name="T2">(83/21) </text:span> ϩⲁ ⲧⲉⲥⲛⲟⲩⲛⲉ ϩⲙ̅ ⲡⲉϥϩⲏⲧ’ ⲉⲥⲛⲁⲡⲱⲣⲕ <text:line-break/><text:span text:style-name="T1"> </text:span><text:span text:style-name="T2">(83/22) </text:span> ⲇⲉ ⲉⲛ’ϣⲁⲥⲟⲩⲱⲛ̅ⲥ̅ ⲉϣⲱⲡⲉ ⲇⲉ ⲧⲛ̅‐ <text:line-break/><text:span text:style-name="T1"> </text:span><text:span text:style-name="T2">(83/23) </text:span> ⲛⲟ ⲛ̅ⲁⲧ’ⲥⲟⲟⲩⲛ ⲉⲣⲟⲥ ⲥϫⲉ ⲛⲟⲩⲛⲉ ϩⲣ[ⲁ]ⲓ̣̈ <text:line-break/><text:span text:style-name="T1"> </text:span><text:span text:style-name="T2">(83/24) </text:span> ⲛ̅ϩⲏⲧⲛ̅ ⲁⲩⲱ ⲥⲧⲉⲩⲟ ⲉⲃⲟⲗ ⲛ̅ⲛⲉⲥⲕⲁⲣ‐ <text:line-break/><text:span text:style-name="T1"> </text:span><text:span text:style-name="T2">(83/25) </text:span> ⲡⲟⲥ ϩⲣⲁⲓ̈ ϩⲙ̅ ⲡⲛ̅ϩⲏⲧ’ ⲥⲟ ⲛ̅ϫⲟⲉⲓⲥ ⲉⲣⲟⲛ <text:line-break/><text:span text:style-name="T1"> </text:span><text:span text:style-name="T2">(83/26) </text:span> ⲧⲛ̅ⲛⲟ ⲛ̅ϩⲙϩ̅ⲁ̅ⲗ̅ ⲛⲁⲥ ⲥⲣ̅ⲁⲓⲭⲙⲁⲗⲱ̣[ⲧ]ⲓ̣ⲍⲉ̣ <text:line-break/><text:span text:style-name="T1"> </text:span><text:span text:style-name="T2">(83/27) </text:span> ⲙ̅ⲙⲟⲛ ⲉⲧⲣⲛ̅ⲉⲓⲣⲉ ⲛ̅ⲛⲉⲧⲛ̅ⲟⲩⲟϣ̣[ⲟⲩ ⲁⲛ] <text:line-break/><text:span text:style-name="T1"> </text:span><text:span text:style-name="T2">(83/28) </text:span> ⲛⲉⲧⲛ̅ⲟⲩⲟϣⲟⲩ ⲧⲛ̅ⲉⲓⲣⲉ ⲙ̅ⲙⲟⲟⲩ [ⲁⲛ ⲥ]‐ <text:line-break/><text:span text:style-name="T1"> </text:span><text:span text:style-name="T2">(83/29) </text:span> ϭⲙ̅ ϭⲟⲙ’ ϫⲉ ⲙ̅ⲡⲛ̅ⲥⲟⲩⲱⲛ̅ⲥ̅ ϩⲱⲥ̣ [ⲉⲥϣⲟ]‐ <text:line-break/><text:span text:style-name="T1"> </text:span><text:span text:style-name="T2">(83/30) </text:span> ⲟⲡ’ ⲙⲉⲛ ⲥⲣ̅ⲉⲛⲉⲣⲅⲉⲓ ⲧⲙ̅ⲛ̅ⲧⲁ̣ⲧⲥ̣[ⲟⲟⲩⲛ] <text:line-break/><text:span text:style-name="T1"> </text:span><text:span text:style-name="T2">(83/31) </text:span> ⲉⲥϣⲟⲟⲡ’ ⲙ̅ⲙⲁⲁⲩ ⲛ̅ⲛ̅ⲡⲉ[ⲑⲟⲟⲩ ⲧⲏⲣⲟⲩ] <text:line-break/><text:span text:style-name="T1"> </text:span><text:span text:style-name="T2">(83/32) </text:span> ⲧⲙ̅ⲛ̅ⲧ̅ⲁⲧ’ⲥⲟⲟⲩⲛ [ⲉⲥ]ⲛ̣ⲁ̣ϣⲉ ⲁⲡ̣[ⲙⲟⲩ ϫⲉ] <text:line-break/><text:span text:style-name="T1"> </text:span><text:span text:style-name="T2">(83/33) </text:span> ⲛⲉⲧ’ϣⲟⲟⲡ’ ⲉⲃⲟⲗ ϩⲛ̣̅ ⲧⲙ̅ⲛ̅ⲧ̣̅̅[ⲁⲧⲥⲟⲟⲩⲛ] <text:line-break/><text:span text:style-name="T1"> </text:span><text:span text:style-name="T2">(83/34) </text:span> ⲟⲩⲧⲉ ⲛⲉⲩϣⲟⲟⲡ’ ⲁⲛ’ ⲟⲩⲧⲉ̣ [ⲥⲉϣⲟⲟⲡ ⲁⲛ] <text:line-break/><text:span text:style-name="T1"> </text:span><text:span text:style-name="T2">(83/35) </text:span> ⲟⲩⲧⲉ ⲥⲉⲛⲁϣⲱⲡⲉ ⲁⲛ [......] <text:line-break/><text:span text:style-name="T1"> </text:span><text:span text:style-name="T2">(84/1) </text:span> ⲥⲉⲛⲁϫⲱⲕ’ ⲉⲃⲟⲗ’ ϩⲟⲧⲁⲛ ⲉⲣϣⲁ ⲧⲁⲗⲏⲑⲉⲓⲁ <text:line-break/><text:span text:style-name="T1"> </text:span><text:span text:style-name="T2">(84/2) </text:span> ⲧⲏⲣⲥ’ ⲟⲩⲱⲛϩ’ ⲉⲃⲟⲗ ⲧⲁⲗⲏⲑⲉⲓⲁ ⲅⲁⲣ’ ⲕⲁⲧⲁ ⲑⲉ <text:line-break/><text:span text:style-name="T1"> </text:span><text:span text:style-name="T2">(84/3) </text:span> ⲛ̅ⲧⲙ̅ⲛ̅ⲧⲁⲧ’ⲥⲟⲟⲩⲛ’ ⲉⲥϩⲏⲡ’ ⲙⲉⲛ ⲥⲣ̅ⲁⲛⲁ‐ <text:line-break/><text:span text:style-name="T1"> </text:span><text:span text:style-name="T2">(84/4) </text:span> ⲡⲁⲩⲉ ϩⲣⲁⲓ̈ ⲛ̅ϩⲏⲧⲥ̅ ⲉⲥϣⲁⲟⲩⲱⲛϩ ⲇⲉ ⲉⲃⲟⲗ <text:line-break/><text:span text:style-name="T1"> </text:span><text:span text:style-name="T2">(84/5) </text:span> ⲛ̅ⲥⲉⲥⲟⲩⲱⲛⲥ̅ ϣⲁⲩⲧⲛⲁⲥ ⲉⲟⲟⲩ ϩⲟⲥⲟⲛ <text:line-break/><text:span text:style-name="T1"> </text:span><text:span text:style-name="T2">(84/6) </text:span> ⲥϭⲛ̅ ϭⲟⲙ’ ⲉⲧⲙ̅ⲛ̅ⲧⲁⲧⲥⲟⲟⲩⲛ ⲁⲩⲱ ⲁⲧ’ⲡⲗⲁ‐ <text:line-break/><text:span text:style-name="T1"> </text:span><text:span text:style-name="T2">(84/7) </text:span> ⲛⲏ ⲥϯ ⲛ̅ⲧⲙ̅ⲛ̅ⲧⲉⲗⲉⲩⲑⲉⲣⲟⲥ ⲡⲉϫⲁϥ’ ⲛ̅ϭⲓ <text:line-break/><text:span text:style-name="T1"> </text:span><text:span text:style-name="T2">(84/8) </text:span> ⲡⲗⲟⲅⲟⲥ ϫⲉ ⲉⲧⲉⲧⲛ̅ϣⲁⲛ’ⲥⲟⲩⲱⲛ ⲧⲁⲗⲏ‐ <text:line-break/><text:span text:style-name="T1"> </text:span><text:span text:style-name="T2">(84/9) </text:span> ⲑⲉⲓⲁ ⲧⲁⲗⲏⲑⲉⲓⲁ ⲛⲁⲣ̅ ⲧⲏⲛⲉ ⲛ̅ⲉⲗⲉⲩⲑⲉⲣⲟⲥ <text:line-break/><text:span text:style-name="T1"> </text:span><text:span text:style-name="T2">(84/10) </text:span> ⲧⲙ̅ⲛ̅ⲧⲁⲧⲥⲟⲟⲩⲛ’ ⲥⲟ ⲛ̅ϩⲙϩ̅ⲁⲗ̅ ⲧⲅⲛⲱⲥⲓⲥ ⲟⲩ‐ <text:line-break/><text:span text:style-name="T1"> </text:span><text:span text:style-name="T2">(84/11) </text:span> ⲉⲗⲉⲩⲑⲉⲣⲓⲁ ⲧⲉ’ ⲉⲛϣⲁⲥⲟⲩⲱⲛ’ ⲧⲁⲗⲏⲑⲉⲓⲁ <text:line-break/><text:span text:style-name="T1"> </text:span><text:span text:style-name="T2">(84/12) </text:span> ⲧⲛ̅ⲛⲁϩⲉ’ ⲁⲛⲕⲁⲣⲡⲟⲥ ⲛ̅ⲧⲁⲗⲏⲑⲉⲓⲁ ϩⲣⲁⲓ̈ ⲛ̅‐ <text:line-break/><text:span text:style-name="T1"> </text:span><text:span text:style-name="T2">(84/13) </text:span> ϩⲏⲧⲛ̅ ⲉⲛ’ϣⲁϩⲱⲧⲣ̅ ⲉⲣⲟⲥ ⲥⲛⲁϫⲓ ⲙ̅ⲡⲛ̅ⲡⲗⲏ‐ <text:line-break/><text:span text:style-name="T1"> </text:span><text:span text:style-name="T2">(84/14) </text:span> ⲣⲱⲙⲁ §ⲧⲉⲛⲟⲩ ⲟⲩⲛ’ⲧⲁⲛ’ ⲙ̅ⲙⲁⲩ ⲛ̅ⲛⲉⲧⲟⲩ‐ <text:line-break/><text:span text:style-name="T1"> </text:span><text:span text:style-name="T2">(84/15) </text:span> ⲟⲛⲉϩ ⲉⲃⲟⲗ’ ⲛ̅ⲧⲉ ⲡⲥⲱⲛⲧ’ ϣⲁⲛ’ϫⲟⲟⲥ ϫⲉ <text:line-break/><text:span text:style-name="T1"> </text:span><text:span text:style-name="T2">(84/16) </text:span> ⲛ̅ⲧⲟⲟⲩ ⲛⲉ ⲛ’ϫⲱⲱⲣⲉ ⲉⲧ’ⲧⲁⲉⲓⲏⲩ ⲛⲉⲑⲏⲡ’ <text:line-break/><text:span text:style-name="T1"> </text:span><text:span text:style-name="T2">(84/17) </text:span> ⲇⲉ ⲛⲉ ⲛϭⲱⲃ’ ⲉⲧϣⲏⲥ ⲧⲁⲉⲓ ⲧⲉ ⲑⲉ ⲛ̅ⲛⲉⲧⲟⲩ‐ <text:line-break/><text:span text:style-name="T1"> </text:span><text:span text:style-name="T2">(84/18) </text:span> ⲟⲛϩ ⲉⲃⲟⲗ’ ⲛ̅ⲧⲁⲗⲏⲑⲉⲓⲁ ϩⲛ̅ϭⲱⲃ’ ⲛⲉ ⲁⲩⲱ <text:line-break/><text:span text:style-name="T1"> </text:span><text:span text:style-name="T2">(84/19) </text:span> ⲥⲉϣⲏⲥ ⲛⲉⲑⲏⲡ’ ⲇⲉ ⲛ̅ϫⲱⲣⲉ ⲛⲉ ⲁⲩⲱ ⲥⲉⲧⲁ‐ <text:line-break/><text:span text:style-name="T1"> </text:span><text:span text:style-name="T2">(84/20) </text:span> ⲉⲓⲏⲩ ⲥⲉⲟⲩⲟⲛϩ ⲇⲉ ⲉⲃⲟⲗ ⲛ̅ϭⲓ ⲙ̅ⲙⲩⲥⲧⲏⲣⲓⲟⲛ <text:line-break/><text:span text:style-name="T1"> </text:span><text:span text:style-name="T2">(84/21) </text:span> ⲛ̅ⲧⲁⲗⲏⲑⲉⲓⲁ ⲉⲩⲟ ⲛ̅ⲧⲩⲡⲟⲥ ϩⲓ ϩⲓⲕⲱⲛ ⲡⲕⲟⲓ‐ <text:line-break/><text:span text:style-name="T1"> </text:span><text:span text:style-name="T2">(84/22) </text:span> ⲧⲱⲛ ⲇⲉ ϥϩⲏⲡ’ ⲛ̅ⲧⲟϥ ⲡⲉ ⲡⲉⲧⲟⲩⲁⲁⲃ’ ϩⲙ̅ <text:line-break/><text:span text:style-name="T1"> </text:span><text:span text:style-name="T2">(84/23) </text:span> ⲡⲉⲧⲟⲩⲁⲁⲃ’ ⲛⲉⲣⲉ ⲡⲕⲁⲧⲁⲡⲉⲧⲁⲥⲙⲁ ⲙⲉⲛ’ <text:line-break/><text:span text:style-name="T1"> </text:span><text:span text:style-name="T2">(84/24) </text:span> ϩⲟⲃⲥ̅ ⲛ̅ϣⲟⲣⲡ’ ⲡⲱⲥ ⲉⲣⲉ ⲡⲛⲟⲩⲧⲉ ⲣ̅ⲇⲓⲟⲓⲕⲉⲓ <text:line-break/><text:span text:style-name="T1"> </text:span><text:span text:style-name="T2">(84/25) </text:span> ⲛ̅ⲧⲕⲧⲓⲥⲓⲥ ⲉϥϣⲁⲡⲱϩ ⲇⲉ ⲛ̅ϭⲓ ⲡⲕⲁⲧⲁⲡⲉ‐ <text:line-break/><text:span text:style-name="T1"> </text:span><text:span text:style-name="T2">(84/26) </text:span> ⲧ̣ⲁ̣ⲥ̣[ⲙ]ⲁ̣ ⲁⲩⲱ ⲛ̅ⲧⲉ ⲛⲁ ⲡⲥⲁ ⲛϩⲟⲩⲛ’ ⲟⲩⲱⲛϩ <text:line-break/><text:span text:style-name="T1"> </text:span><text:span text:style-name="T2">(84/27) </text:span> [ⲉⲃⲟⲗ] ⲥⲉⲛⲁⲕⲱ ⲇⲉ ⲙ̅ⲡⲉⲉⲓⲏⲉⲓ ⲛ̅ⲥⲱⲟⲩ <text:line-break/><text:span text:style-name="T1"> </text:span><text:span text:style-name="T2">(84/28) </text:span> [ⲉϥⲟ] ⲛ̅ⲉⲣⲏⲙⲟⲥ ⲙⲁⲗⲗⲟⲛ ⲇⲉ ⲥⲉⲛⲁⲣ̅ⲕⲁⲧⲁ‐ <text:line-break/><text:soft-page-break/><text:span text:style-name="T1"> </text:span><text:span text:style-name="T2">(84/29) </text:span> [ⲗⲩⲉ] ⲙ̣̅ⲙⲟϥ’ ⲧⲙ̅ⲛ̅ⲧ̅ⲛⲟⲩⲧⲉ ⲇⲉ ⲧⲏⲣ̅ⲥ̅ ⲥⲁⲡⲱⲧ’ <text:line-break/><text:span text:style-name="T1"> </text:span><text:span text:style-name="T2">(84/30) </text:span> [ⲉⲃⲟⲗ]’ ⲛ̅ⲛⲉⲉⲓⲙⲁ ⲉϩⲟⲩⲛ ⲁⲛ ⲉⲛⲉⲧⲟⲩⲁⲁⲃ’ <text:line-break/><text:span text:style-name="T1"> </text:span><text:span text:style-name="T2">(84/31) </text:span> [ⲛ̅ⲧⲉ ⲛ]ⲉ̣ⲧ̣[ⲟ]ⲩⲁⲁⲃ ⲥⲛⲁϣⲧⲱϩ ⲅⲁⲣ ⲁⲛ ⲙⲛ̅ ⲡⲟⲩ‐ <text:line-break/><text:span text:style-name="T1"> </text:span><text:span text:style-name="T2">(84/32) </text:span> [ⲟⲉⲓⲛ ⲛ̅]ⲁ̣ⲧ’̣ⲧⲱϩ ⲙⲛ̣̅ ⲡⲡⲗⲏⲣⲱⲙⲁ ⲛ̅ⲁⲧ’‐ <text:line-break/><text:span text:style-name="T1"> </text:span><text:span text:style-name="T2">(84/33) </text:span> [ϣⲧⲁ ⲁⲗ]ⲗ̣ⲁ ⲥⲛⲁϣ̣ⲱ̣ⲡⲉ ϩⲁ ⲛ̅ⲧⲛϩ ⲙ̅ⲡⲥxⲟⲥ <text:line-break/><text:span text:style-name="T1"> </text:span><text:span text:style-name="T2">(84/34) </text:span> [ⲁⲩⲱ ϩⲁ ⲛ]ⲉ̣ϥϭⲃⲟⲉⲓ ⲧⲉⲉⲓϭⲓⲃⲱⲧⲟⲥ ⲛⲁϣⲱ‐ <text:line-break/><text:span text:style-name="T1"> </text:span><text:span text:style-name="T2">(84/35) </text:span> [ⲡⲉ ⲙ̅ⲡⲟ]ⲩ̣ⲟⲩϫⲁⲉⲓ ⲛ̅ⲧⲁⲣⲉ ⲡⲕⲁⲧⲁⲕⲗⲩⲥ’‐ <text:line-break/><text:span text:style-name="T1"> </text:span><text:span text:style-name="T2">(85/1) </text:span> ⲙⲟⲥ ⲙ̅ⲙⲟⲟⲩ ⲉⲙⲁϩⲧⲉ ⲉϩⲣⲁⲓ̈ ⲉϫⲱⲟⲩ ⲉⲣϣⲁ <text:line-break/><text:span text:style-name="T1"> </text:span><text:span text:style-name="T2">(85/2) </text:span> ϩⲛ̅ϩⲟⲉⲓⲛⲉ ϣⲱⲡⲉ ϩⲛ̅ ⲧⲫⲩⲗⲏ ⲛ̅ⲧⲙ̅ⲛ̅ⲧ̅ⲟⲩ‐ <text:line-break/><text:span text:style-name="T1"> </text:span><text:span text:style-name="T2">(85/3) </text:span> ⲏⲏⲃ ⲛⲁⲉⲓ ⲛⲁϣϭⲛ̅ ϭⲟⲙ’ ⲛ̅ⲃⲱⲕ’ ⲉϩⲟⲩⲛ ⲉ‐ <text:line-break/><text:span text:style-name="T1"> </text:span><text:span text:style-name="T2">(85/4) </text:span> ⲡⲥⲁ ⲛϩⲟⲩⲛ ⲙ̅ⲡⲕⲁⲧⲁⲡⲉⲧⲁⲥⲙⲁ ⲙⲛ̅ ⲡⲁⲣ‐ <text:line-break/><text:span text:style-name="T1"> </text:span><text:span text:style-name="T2">(85/5) </text:span> ⲭⲓⲉⲣⲉⲩⲥ ⲉⲧⲃⲉ ⲡⲁⲉⲓ ⲙ̅ⲡⲉ ⲡⲕⲁⲧⲁⲡⲉⲧⲁⲥ‐ <text:line-break/><text:span text:style-name="T1"> </text:span><text:span text:style-name="T2">(85/6) </text:span> ⲙⲁ ⲡⲱϩ ⲙ̅ⲡⲥⲁ ⲛⲧⲡⲉ ⲟⲩⲁⲁⲧϥ ⲉⲡⲉⲓ ⲛⲉⲩ‐ <text:line-break/><text:span text:style-name="T1"> </text:span><text:span text:style-name="T2">(85/7) </text:span> ⲛⲁⲟⲩⲉⲛ ⲛ̅ⲛⲁ ⲡⲥⲁ ⲛⲧⲡⲉ ⲟⲩⲁⲁⲧⲟⲩ’ ⲟⲩⲧⲉ <text:line-break/><text:span text:style-name="T1"> </text:span><text:span text:style-name="T2">(85/8) </text:span> ⲙ̅ⲡⲥⲁ ⲙⲡⲓⲧⲛ̅ ⲟⲩⲁⲁⲧϥ’ ⲁⲛ ⲛ̅ⲧⲁϥⲡⲱϩ ⲉⲡⲉⲓ <text:line-break/><text:span text:style-name="T1"> </text:span><text:span text:style-name="T2">(85/9) </text:span> ⲛⲁϥⲛⲁⲟⲩⲱⲛϩ ⲉⲃⲟⲗ ⲛ̅ⲛⲁ ⲡⲥⲁ ⲙⲡⲓⲧⲛ ⲟⲩ‐ <text:line-break/><text:span text:style-name="T1"> </text:span><text:span text:style-name="T2">(85/10) </text:span> ⲁⲁⲩ ⲁⲗⲗⲁ ⲛ̅ⲧⲁϥⲡⲱϩ ⲛ̅ⲧⲡⲉ ⲉⲡⲓⲧⲛ̅ ⲁⲛⲁ <text:line-break/><text:span text:style-name="T1"> </text:span><text:span text:style-name="T2">(85/11) </text:span> ⲡⲥⲁ ⲛⲧⲡⲉ ⲟⲩⲱⲛ’ ⲛⲁⲛ ⲛ̅ⲛⲉⲧⲙ̅ⲡⲥⲁ ⲙⲡⲓ‐ <text:line-break/><text:span text:style-name="T1"> </text:span><text:span text:style-name="T2">(85/12) </text:span> ⲧⲛ̅ ϫⲉⲕⲁⲁⲥ ⲉⲛⲛⲁⲃⲱⲕ’ ⲉϩⲟⲩⲛ’ ⲁⲡⲡⲉⲑⲏⲡ’ <text:line-break/><text:span text:style-name="T1"> </text:span><text:span text:style-name="T2">(85/13) </text:span> ⲛ̅ⲧⲁⲗⲏⲑⲉⲓⲁ ⲡⲁⲉⲓ ⲁⲗⲏⲑⲱⲥ ⲡⲉ ⲡⲉⲧ’ⲧⲁⲉⲓ‐ <text:line-break/><text:span text:style-name="T1"> </text:span><text:span text:style-name="T2">(85/14) </text:span> ⲏⲩ ⲉⲧⲟ ⲛ̅ϫⲱⲱⲣⲉ ⲉⲛⲁⲃⲱⲕ’ ⲇⲉ ⲉϩⲟⲩⲛ ⲉⲙⲁⲩ <text:line-break/><text:span text:style-name="T1"> </text:span><text:span text:style-name="T2">(85/15) </text:span> ϩⲓⲧⲛ̅ ϩⲛ̅ⲧⲩⲡⲟⲥ ⲉⲩϣⲏⲥ ⲙⲛ̅ ϩⲛ̅ⲙ̅ⲛ̅ⲧ̅ϭⲱⲃ’ <text:line-break/><text:span text:style-name="T1"> </text:span><text:span text:style-name="T2">(85/16) </text:span> ⲥⲉϣⲏⲥ ⲙⲉⲛ’ ⲛ̅ⲛⲁϩⲣⲛ̅ ⲡⲉⲟⲟⲩ ⲉⲧϫⲏⲕ’ ⲉⲃⲟ[ⲗ] <text:line-break/><text:span text:style-name="T1"> </text:span><text:span text:style-name="T2">(85/17) </text:span> ⲟⲩⲛ̅ ⲉⲟⲟⲩ ⲉϥϫⲟⲥⲉⲉⲟⲟⲩ ⲟⲩⲛ’ ϭⲟⲙ’ ⲉϥϫⲟ‐ <text:line-break/><text:span text:style-name="T1"> </text:span><text:span text:style-name="T2">(85/18) </text:span> ⲥⲉ ⲉϭⲟⲙ’ ⲉⲧⲃⲉ ⲡⲁⲉⲓ ⲁⲛ’ⲧⲉⲗⲉⲓⲟⲛ’ ⲟⲩⲉⲛ <text:line-break/><text:span text:style-name="T1"> </text:span><text:span text:style-name="T2">(85/19) </text:span> ⲛⲁⲛ ⲙⲛ̅ ⲛⲉⲑⲏⲡ’ ⲛ̅ⲧⲁⲗⲏⲑⲉⲓⲁ ⲁⲩⲱ ⲛⲉⲧⲟⲩ̣‐ <text:line-break/><text:span text:style-name="T1"> </text:span><text:span text:style-name="T2">(85/20) </text:span> ⲁⲁⲃ ⲛ̅ⲛⲉⲧⲟⲩⲁⲁⲃ ⲁⲩϭⲱⲗⲡ’ ⲉⲃⲟⲗ’ ⲁⲩⲱ ⲁ‐ <text:line-break/><text:span text:style-name="T1"> </text:span><text:span text:style-name="T2">(85/21) </text:span> ⲡⲕⲟⲓⲧⲱⲛ ⲧⲱϩⲙ’ ⲙ̅ⲙⲟⲛ ⲉϩⲟⲩⲛ’ §ⲉⲛ ϩⲟⲥⲟⲛ <text:line-break/><text:span text:style-name="T1"> </text:span><text:span text:style-name="T2">(85/22) </text:span> ⲙⲉⲛ’ ϥϩⲏⲡ’ ⲧⲕⲁⲕⲓⲁ ⲟⲩⲟⲥϥ’ ⲙⲉⲛ ⲙ̅ⲡⲟⲩ‐ <text:line-break/><text:span text:style-name="T1"> </text:span><text:span text:style-name="T2">(85/23) </text:span> ϥⲓⲧⲥ̅ ⲇⲉ ⲛ̅ⲧⲙⲏⲧⲉ ⲙ̅ⲡⲥⲡⲉⲣⲙⲁ ⲙ̅ⲡⲡⲛ̅ⲁ̣̅̅ <text:line-break/><text:span text:style-name="T1"> </text:span><text:span text:style-name="T2">(85/24) </text:span> ⲉⲧⲟⲩⲁⲁⲃ’ ⲥⲉⲟ ⲛ̅ϩⲙϩ̅ⲁ̅ⲗ̅ ⲛ̅ⲧⲡⲟⲛⲏⲣⲓⲁ ϩⲟ‐ <text:line-break/><text:span text:style-name="T1"> </text:span><text:span text:style-name="T2">(85/25) </text:span> ⲧⲁⲛ ⲇⲉ ⲉϥϣⲁϭⲱⲗⲡ’ ⲉⲃⲟⲗ ⲧⲟⲧⲉ ⲡⲟⲩⲟ‐ <text:line-break/><text:span text:style-name="T1"> </text:span><text:span text:style-name="T2">(85/26) </text:span> ⲉⲓⲛ ⲛ̅ⲧⲉⲗⲉⲓⲟⲛ’ ⲛⲁϩⲁⲧⲉ ⲉⲃⲟⲗ’ ⲉϫⲛ̣̅ [ⲟ]ⲩⲟⲛ <text:line-break/><text:span text:style-name="T1"> </text:span><text:span text:style-name="T2">(85/27) </text:span> ⲛⲓⲙ’ ⲁⲩⲱ ⲛⲉⲧⲛ̅ϩⲏⲧϥ’ ⲧⲏⲣⲟⲩ ⲥⲉⲛ̣[ⲁϫⲓ ⲭⲣⲓ]‐ <text:line-break/><text:span text:style-name="T1"> </text:span><text:span text:style-name="T2">(85/28) </text:span> ⲥⲙⲁ ⲧⲟⲧⲉ ⲛ̅ϩⲙϩ̅ⲁ̅ⲗ̅ ⲛ̅ⲁⲣ̅ⲉⲗⲉⲩⲑⲉ̣[ⲣⲟⲥ ⲁⲩⲱ] <text:line-break/><text:span text:style-name="T1"> </text:span><text:span text:style-name="T2">(85/29) </text:span> ⲛ̅ⲥⲉⲥⲱⲧⲉ ⲛ̅ⲁⲓⲭⲙⲁⲗⲱⲧⲟⲥ ⲧⲱϭⲉ ⲛ̣[ⲓⲙ ⲉⲙ]‐ <text:line-break/><text:span text:style-name="T1"> </text:span><text:span text:style-name="T2">(85/30) </text:span> ⲡⲉ ⲡⲁⲉⲓⲱⲧ’ ⲉⲧϩⲛ̅ ⲙ̅ⲡⲏⲩⲉ ⲧⲟϭϥ[’ ⲥⲉⲛⲁ]‐ <text:line-break/><text:span text:style-name="T1"> </text:span><text:span text:style-name="T2">(85/31) </text:span> ⲡⲟⲣⲕϥ’ ⲛⲉⲧⲡⲟⲣϫ’ ⲥⲉⲛⲁϩⲱⲧ̣ⲣ̣̅ ⲛ̣[......] <text:line-break/><text:span text:style-name="T1"> </text:span><text:span text:style-name="T2">(85/32) </text:span> ⲥⲉⲛⲁⲙⲟⲩϩ ⲟⲩⲟⲛ’ ⲛ̣ⲓⲙ’ ⲉⲧⲛⲁ̣ⲃ̣[ⲱⲕ ⲉϩⲟⲩⲛ] <text:line-break/><text:span text:style-name="T1"> </text:span><text:span text:style-name="T2">(85/33) </text:span> ⲉⲡⲕⲟⲓⲧⲱⲛ ⲥⲉⲛⲁϫ̣ⲉⲣⲟ ⲙ̅ⲡⲟⲩ̣[ⲟⲉⲓⲛ ...] <text:line-break/><text:span text:style-name="T1"> </text:span><text:span text:style-name="T2">(85/34) </text:span> ⲟ ⲅⲁⲣ ⲛ̅ⲑⲉ ⲛ̅ⲛ̅ⲅⲁⲙⲟⲥ ⲉⲧⲛ̅ⲛⲉ̣[......] <text:line-break/><text:span text:style-name="T1"> </text:span><text:span text:style-name="T2">(85/35) </text:span> ϣⲱⲡⲉ ⲛ̅ⲧⲟⲩϣⲏ ⲡⲕⲱϩⲧ’ ϣ̣[ⲁϥ......] <text:line-break/><text:span text:style-name="T1"> </text:span><text:span text:style-name="T2">(86/1) </text:span> ⲛ̅ⲧⲟⲩϣⲏ ϣⲁϥϫⲉⲛⲉ ⲙ̅ⲙⲩⲥⲧⲏⲣⲓⲟⲛ ⲇⲉ <text:line-break/><text:span text:style-name="T1"> </text:span><text:span text:style-name="T2">(86/2) </text:span> ⲙ̅ⲡⲓⲅⲁⲙⲟⲥ ⲛ̅ⲧⲟϥ ϣⲁⲩϫⲱⲕ’ ⲉⲃⲟⲗ’ ϩⲙ̅ ⲡⲉ‐ <text:line-break/><text:span text:style-name="T1"> </text:span><text:span text:style-name="T2">(86/3) </text:span> ϩⲟⲟⲩ’ ⲙⲛ̅ ⲡⲟⲩⲟⲉⲓⲛ ⲙⲁⲣⲉ ⲫⲟⲟⲩ ⲉⲧⲙ̅ⲙⲁⲩ <text:line-break/><text:span text:style-name="T1"> </text:span><text:span text:style-name="T2">(86/4) </text:span> ⲏ ⲡⲉϥ’ⲟⲩⲟⲉⲓⲛ ϩⲱⲧⲡ’ ⲉⲣϣⲁ ⲟⲩⲁ ϣⲱⲡⲉ ⲛ̅‐ <text:line-break/><text:span text:style-name="T1"> </text:span><text:span text:style-name="T2">(86/5) </text:span> ϣⲏⲣⲉ ⲙ̅ⲡⲛⲩⲙ’ⲫⲱⲛ’ ϥⲛⲁϫⲓ ⲙ̅ⲡⲟⲩⲟⲉⲓⲛ <text:line-break/><text:soft-page-break/><text:span text:style-name="T1"> </text:span><text:span text:style-name="T2">(86/6) </text:span> ⲉⲧⲙ̅ ⲟⲩⲁ ϫⲓⲧϥ’ ⲉϥⲛ̅ⲛⲉⲉⲓⲙⲁ ϥⲛⲁϣϫⲓⲧϥ’ <text:line-break/><text:span text:style-name="T1"> </text:span><text:span text:style-name="T2">(86/7) </text:span> ⲁⲛ ⲙ̅ⲡⲕⲉⲙⲁ ⲡⲉⲧⲁϫⲓ ⲡⲟⲩⲟⲉⲓⲛ ⲉⲧⲙ̅ⲙⲁⲩ <text:line-break/><text:span text:style-name="T1"> </text:span><text:span text:style-name="T2">(86/8) </text:span> ⲥⲉⲛⲁⲛⲁⲩ ⲁⲛ’ ⲉⲣⲟϥ’ ⲟⲩⲧⲉ ⲥⲉⲛⲁϣⲉⲙⲁϩⲧⲉ <text:line-break/><text:span text:style-name="T1"> </text:span><text:span text:style-name="T2">(86/9) </text:span> ⲁⲛ’ ⲙ̅ⲙⲟϥ’ ⲁⲩⲱ ⲙⲛ̅ ⲗⲁⲁⲩ ⲛⲁϣⲣ̅ⲥⲕⲩⲗⲗⲉ ⲙ̅‐ <text:line-break/><text:span text:style-name="T1"> </text:span><text:span text:style-name="T2">(86/10) </text:span> ⲡⲁⲉⲓ ⲛ̅ⲧⲉⲉⲓⲙⲉⲓⲛⲉ ⲕⲁⲛ’ ⲉϥⲣ̅ⲡⲟⲗⲓⲧⲉⲩⲉⲥ‐ <text:line-break/><text:span text:style-name="T1"> </text:span><text:span text:style-name="T2">(86/11) </text:span> ⲑⲁⲓ ϩⲙ̅ ⲡⲕⲟⲥⲙⲟⲥ ⲁⲩⲱ ⲟⲛ ⲉϥϣⲁⲉⲓ ⲉⲃⲟⲗ <text:line-break/><text:span text:style-name="T1"> </text:span><text:span text:style-name="T2">(86/12) </text:span> ϩⲙ̅ ⲡⲕⲟⲥⲙⲟⲥ ⲏⲇⲏ ⲁϥϫⲓ ⲛ̅ⲧⲁⲗⲏⲑⲉⲓⲁ ϩⲛ̅ <text:line-break/><text:span text:style-name="T1"> </text:span><text:span text:style-name="T2">(86/13) </text:span> ⲛ̅ϩⲓⲕⲱⲛ ⲡⲕⲟⲥⲙⲟⲥ ⲁϥϣⲱⲡⲉ ⲛ̅ⲛⲁⲓⲱⲛ <text:line-break/><text:span text:style-name="T1"> </text:span><text:span text:style-name="T2">(86/14) </text:span> ⲡⲁⲓⲱⲛ ⲅⲁⲣ ⲉϥϣⲟⲟⲡ’ ⲛⲁϥ’ ⲙ̅ⲡⲗⲏⲣⲱ‐ <text:line-break/><text:span text:style-name="T1"> </text:span><text:span text:style-name="T2">(86/15) </text:span> ⲙⲁ ⲁⲩⲱ ⲉϥϣⲟⲟⲡ’ ⲛ̅ⲧⲉⲉⲓϩⲉ ϥⲟⲩⲟⲛϩ ⲉⲃⲟⲗ <text:line-break/><text:span text:style-name="T1"> </text:span><text:span text:style-name="T2">(86/16) </text:span> ⲛⲁϥ ⲟⲩⲁⲁϥ ⲉϥϩⲏⲡ’ ⲁⲛ ϩⲙ̅ ⲡⲕⲁⲕⲉ ⲙⲛ̅ ⲧⲟⲩ‐ <text:line-break/><text:span text:style-name="T1"> </text:span><text:span text:style-name="T2">(86/17) </text:span> ϣⲏ ⲁⲗⲗⲁ ⲉϥϩⲏⲡ’ ϩⲛ̅ⲛⲟⲩϩⲟⲟⲩ ⲛ̅ⲧⲉⲗⲉⲓⲟⲛ <text:line-break/><text:span text:style-name="T1"> </text:span><text:span text:style-name="T2">(86/18) </text:span> ⲙⲛ̅ ⲟⲩⲟⲉⲓⲛ ⲉϥⲟⲩⲁⲁⲃ <text:line-break/><text:span text:style-name="T1"> </text:span><text:span text:style-name="T2">(86/19) </text:span> 0ⲡⲉⲩⲁⲅⲅⲉⲗⲓⲟⲛ <text:line-break/><text:span text:style-name="T1"> </text:span><text:span text:style-name="T2">(86/20) </text:span> 0ⲡⲕⲁⲧⲁ ⲫⲓⲗⲓⲡⲡⲟⲥ </text:p>
      <text:p text:style-name="P3"/>
      <text:p text:style-name="P4">( codex II ) The Hypostasis of the Archons</text:p>
      <text:p text:style-name="P3"><text:span text:style-name="T1"> </text:span><text:span text:style-name="T2">(86/20) </text:span> §ⲉⲧⲃⲉ ⲑⲩⲡⲟⲥⲧⲁⲥⲓⲥ ⲛ̅ⲛ̅ⲉⲝⲟⲩⲥⲓⲁ ϩⲙ̅ ⲡⲡ̅ⲛ̅ⲁ <text:line-break/><text:span text:style-name="T1"> </text:span><text:span text:style-name="T2">(86/21) </text:span> ⲙ̅ⲡⲉⲓⲱⲧ’ ⲛ̅ⲧⲙⲉ ⲁϥϫⲟⲟⲥ ⲛⲁⲛ ⲛ̅ϭⲓ ⲡⲛⲟϭ <text:line-break/><text:span text:style-name="T1"> </text:span><text:span text:style-name="T2">(86/22) </text:span> ⲛ̅ⲁⲡⲟⲥⲧⲟⲗⲟⲥ ⲉⲧⲃⲉ ⲛⲉⲝⲟⲩⲥⲓⲁ ⲙ̅ⲡⲕⲁⲕⲉ <text:line-break/><text:span text:style-name="T1"> </text:span><text:span text:style-name="T2">(86/23) </text:span> ϫⲉ ⲡⲛ̅ϣⲱϫⲉ ϣⲟⲟⲡ’ ⲁⲛ ⲟⲩⲃⲉ ⲥⲁⲣⲝ ϩⲓ <text:line-break/><text:span text:style-name="T1"> </text:span><text:span text:style-name="T2">(86/24) </text:span> [ⲥⲛⲟ]ϥ̣ ⲁⲗⲗⲁ ⲉϥ’ⲟⲩⲃⲉ ⲛⲉⲝⲟⲩⲥⲓⲁ ⲙ̅ⲡⲕⲟⲥ‐ <text:line-break/><text:span text:style-name="T1"> </text:span><text:span text:style-name="T2">(86/25) </text:span> [ⲙⲟⲥ] ⲙ̣ⲛ̅ ⲙ̅ⲡⲛⲉⲩⲙⲁⲧⲓⲕⲟⲛ ⲛ̅ⲧⲡⲟⲛⲏⲣⲓⲁ <text:line-break/><text:span text:style-name="T1"> </text:span><text:span text:style-name="T2">(86/26) </text:span> [ⲁⲉⲓ]ϫⲉⲛⲉ ⲛⲁⲉⲓ ⲉⲕϣⲓⲛⲉ ⲉⲧⲃⲉ ⲑⲩⲡⲟⲥⲧⲁ‐ <text:line-break/><text:span text:style-name="T1"> </text:span><text:span text:style-name="T2">(86/27) </text:span> [ⲥⲓⲥ ⲛ̅]ⲉⲝⲟⲩⲥⲓⲁ §ⲡⲟⲩⲛⲟϭ ⲇⲉ ⲟⲩⲃⲗ̅ⲗⲉ ⲡⲉ <text:line-break/><text:span text:style-name="T1"> </text:span><text:span text:style-name="T2">(86/28) </text:span> [ⲉⲧⲃⲉ] ⲧⲉ̣[ϥ]ϭⲟⲙ ⲙⲛ̅ ⲧⲉϥⲙ̅ⲛ̅ⲧ̅ⲁⲧⲥⲟⲟⲩⲛ <text:line-break/><text:span text:style-name="T1"> </text:span><text:span text:style-name="T2">(86/29) </text:span> [ⲙⲛ̅ ⲧⲉϥⲙ]ⲛ̣̅ⲧϫⲁⲥⲓϩⲙⲧ’ ⲁϥϫⲟⲟⲥ ϩⲛ̅ ⲧⲉϥ’‐ <text:line-break/><text:span text:style-name="T1"> </text:span><text:span text:style-name="T2">(86/30) </text:span> [ϭⲟⲙ ϫⲉ] ⲁⲛⲟⲕ’ ⲡⲉ̣ ⲡ̣ⲛⲟⲩⲧⲉ ⲙⲛ̅ ⲗⲁⲁⲩ <text:line-break/><text:span text:style-name="T1"> </text:span><text:span text:style-name="T2">(86/31) </text:span> [ⲁϫⲛ̅ⲧ] §[ⲛ̅ⲧ]ⲁ̣ⲣⲉϥϫⲉ ⲡⲁⲉⲓ ⲁϥⲣ̅ ⲛⲟⲃⲉ ⲉϩⲣⲁⲓ̈ <text:line-break/><text:span text:style-name="T1"> </text:span><text:span text:style-name="T2">(86/32) </text:span> [ⲉⲡⲧⲏⲣϥ] ⲁⲩⲱ ⲁⲡⲉⲉⲓϣⲁϫⲉ ⲡⲱϩ ϣⲁϩ‐ <text:line-break/><text:span text:style-name="T1"> </text:span><text:span text:style-name="T2">(87/1) </text:span> ⲣⲁⲓ̈ ⲉⲧⲙ̅ⲛ̅ⲧ̅’̅ⲁⲧⲧⲁⲕⲟ ⲉⲓⲥ ⲟⲩⲥⲙⲏ ⲇⲉ ⲁⲥⲉⲓ ⲉ̣‐ <text:line-break/><text:span text:style-name="T1"> </text:span><text:span text:style-name="T2">(87/2) </text:span> ⲃⲟⲗ’ ϩⲛ̅ ⲧⲙ̅ⲛ̅ⲧ̅ⲁⲧⲧⲁⲕⲟ ⲉⲥϫⲱ ⲙ̅ⲙⲟⲥ ϫⲉ̣ <text:line-break/><text:span text:style-name="T1"> </text:span><text:span text:style-name="T2">(87/3) </text:span> ⲕⲣ̅ⲡⲗⲁⲛⲁⲥⲑⲉ ⲥⲁⲙⲁⲏⲗ ⲉⲧⲉ ⲡⲛⲟⲩⲧⲉ ⲡ[ⲉ] <text:line-break/><text:span text:style-name="T1"> </text:span><text:span text:style-name="T2">(87/4) </text:span> ⲛ̅ⲃ̅ⲃⲗⲗⲉ §ⲁⲛⲉϥⲙⲉⲉⲩⲉ ⲣ̅ ⲃⲗ̅ⲗⲉ ⲁϥⲛⲟⲩϫⲉ <text:line-break/><text:span text:style-name="T1"> </text:span><text:span text:style-name="T2">(87/5) </text:span> ⲉⲃⲟⲗ ⲛ̅ⲧⲉϥϭⲟⲙ ⲉⲧⲉ ⲡⲟⲩⲁ ⲛ̅ⲧⲁϥϫⲟⲟϥ’ <text:line-break/><text:span text:style-name="T1"> </text:span><text:span text:style-name="T2">(87/6) </text:span> ⲁϥⲇⲓⲱⲕⲉ ⲙ̅ⲙⲟϥ’ ϣⲁ ⲡⲓⲧⲛ̅ ⲁⲡⲭⲁⲟⲥ ⲙⲛ̅ <text:line-break/><text:span text:style-name="T1"> </text:span><text:span text:style-name="T2">(87/7) </text:span> ⲡⲛⲟⲩⲛ ⲧⲉϥ’ⲙⲁⲁⲩ ⲉⲃⲟⲗ ϩⲓⲧⲛ̅ ⲧⲡⲓⲥⲧⲓⲥ <text:line-break/><text:span text:style-name="T1"> </text:span><text:span text:style-name="T2">(87/8) </text:span> ⲧⲥⲟⲫⲓⲁ ⲁⲩⲱ ⲁⲥⲕⲁⲑⲓⲥⲧⲁ ⲛ̅ⲛⲉϥ’ϣⲏⲣⲉ <text:line-break/><text:span text:style-name="T1"> </text:span><text:span text:style-name="T2">(87/9) </text:span> ⲡⲟⲩⲁ ⲡⲟⲩⲁ ⲕⲁⲧⲁ ⲧⲉϥϭⲟⲙ’ ⲕⲁⲧⲁ ⲡⲧⲩⲡⲟⲥ <text:line-break/><text:span text:style-name="T1"> </text:span><text:span text:style-name="T2">(87/10) </text:span> ⲛ̅ⲁⲓⲱⲛ’ ⲉⲧⲙ̅ⲡⲥⲁ ⲛⲧⲡⲉ ϫⲉ ⲉⲃⲟⲗ ϩⲛ̅ ⲛⲉ‐ <text:line-break/><text:span text:style-name="T1"> </text:span><text:span text:style-name="T2">(87/11) </text:span> ⲑⲏⲡ’ ⲁⲩϩⲉ ⲁⲛⲉⲧⲟⲩⲟⲛϩ’ ⲉⲃⲟⲗ’ §ⲁⲧⲙ̅ⲛ̅ⲧ̅‐ <text:line-break/><text:span text:style-name="T1"> </text:span><text:span text:style-name="T2">(87/12) </text:span> ⲁⲧⲧⲉⲕⲟ ϭⲱϣ’ⲧ ⲁⲡⲓⲧⲛ̅ ⲁⲙⲙⲉⲣⲟⲥ ⲛⲙ̅‐ <text:line-break/><text:span text:style-name="T1"> </text:span><text:span text:style-name="T2">(87/13) </text:span> ⲙⲟⲟⲩ ⲁⲡⲉⲥⲓⲛⲉ ⲟⲩⲱⲛϩ ⲉⲃⲟⲗ ϩⲛ̅ⲛⲙ̅‐ <text:line-break/><text:span text:style-name="T1"> </text:span><text:span text:style-name="T2">(87/14) </text:span> ⲙⲟⲟⲩ ⲁⲩⲱ ⲁⲛⲉⲝⲟⲩⲥⲓⲁ ⲙ̅ⲡⲕⲁⲕⲉ ⲙⲉⲣⲓⲧⲥ̅ <text:line-break/><text:span text:style-name="T1"> </text:span><text:span text:style-name="T2">(87/15) </text:span> ⲙ̅ⲡⲟⲩϣϭⲛ̅ ϭⲟⲙ ⲇⲉ ⲛ̅ⲧⲉϩⲉ ⲡⲓⲛⲉ ⲉⲧⲙ̅ⲙⲁⲩ <text:line-break/><text:span text:style-name="T1"> </text:span><text:span text:style-name="T2">(87/16) </text:span> ⲡⲉⲛⲧⲁϩⲟⲩⲱⲛ ⲉⲃⲟⲗ ⲛⲁⲩ ϩⲛ̅ⲛⲙ̅ⲙⲟⲟⲩ <text:line-break/><text:span text:style-name="T1"> </text:span><text:span text:style-name="T2">(87/17) </text:span> ⲉⲧⲃⲉ ⲧⲟⲩⲙⲛ̅ⲧϭⲱⲃ ϫⲉ ⲙ̅ⲯⲩⲭⲓⲕⲟⲥ ⲛⲁϣ‐ <text:line-break/><text:span text:style-name="T1"> </text:span><text:span text:style-name="T2">(87/18) </text:span> ⲧⲉϩⲉ ⲙ̅ⲡⲛⲉⲩⲙⲁⲧⲓⲕⲟⲥ ⲁⲛ ϫⲉ ϩⲛ̅ⲛⲁ‐ <text:line-break/><text:span text:style-name="T1"> </text:span><text:span text:style-name="T2">(87/19) </text:span> ⲃⲟⲗ ⲛⲉ ⲙ̅ⲡⲥⲁ ⲙⲡⲓⲧⲛ ⲛ̅ⲧⲟϥ ⲇⲉ ⲟⲩⲉⲃⲟⲗ <text:line-break/><text:span text:style-name="T1"> </text:span><text:span text:style-name="T2">(87/20) </text:span> ⲡⲉ ⲙ̅ⲡⲥⲁ ’ⲛⲧⲡⲉ §ⲉⲧⲃⲉ ⲡⲁⲓ̈ ⲁⲧⲙ̅ⲛ̅ⲧ̅ⲁⲧ‐ <text:line-break/><text:span text:style-name="T1"> </text:span><text:span text:style-name="T2">(87/21) </text:span> ⲧⲁⲕⲟ ϭⲱϣ’ⲧ ⲉⲃⲟⲗ ⲉⲡⲓⲧⲛ̅ ⲁⲙⲙⲉⲣⲟⲥ <text:line-break/><text:span text:style-name="T1"> </text:span><text:span text:style-name="T2">(87/22) </text:span> ϣⲓⲛⲁ ϩⲙ̅ ⲡⲟⲩⲱϣ ⲙ̅ⲡⲉⲓⲱ’ⲧ ⲉⲥⲛⲁϩⲁ‐ <text:line-break/><text:span text:style-name="T1"> </text:span><text:span text:style-name="T2">(87/23) </text:span> ⲧⲣ̅ ⲡⲧⲏ’ⲣϥ ⲙⲛ̅ ⲡⲟⲩⲟⲉⲓⲛ ⲁⲛⲁⲣⲭⲱⲛ ϫⲓ ⲛ̅‐ <text:line-break/><text:span text:style-name="T1"> </text:span><text:span text:style-name="T2">(87/24) </text:span> ⲟⲩⲥⲩⲙⲃⲟⲩⲗⲓⲟⲛ ⲡⲉϫⲁⲩ ϫⲉ ⲁⲙⲏⲉⲓⲧⲛ̣̅ <text:line-break/><text:span text:style-name="T1"> </text:span><text:span text:style-name="T2">(87/25) </text:span> ⲛ̅ⲧⲛ̅ⲧⲁⲙⲓⲟ ⲛ̅ⲟⲩⲣⲱⲙⲉ ⲛ̅ⲛⲟⲩⲭⲟⲩⲥ ⲉ̣‐ <text:line-break/><text:span text:style-name="T1"> </text:span><text:span text:style-name="T2">(87/26) </text:span> ⲃⲟⲗ ϩⲙ̅ ⲡⲕⲁϩ ⲁⲩⲣ̅ⲡⲗⲁⲥⲥⲉ ⲙ̅ⲡⲟⲩ̣ⲧ̣ⲁ̣[ⲙⲓⲟ] <text:line-break/><text:span text:style-name="T1"> </text:span><text:span text:style-name="T2">(87/27) </text:span> ⲉⲩⲣⲙⲛ̅ⲕⲁϩ ⲧⲏⲣ〈ϥ〉 ⲡⲉ §ⲛⲓⲁⲣⲭⲱⲛ ⲇ[ⲉ..ⲥⲱ]‐ <text:line-break/><text:span text:style-name="T1"> </text:span><text:span text:style-name="T2">(87/28) </text:span> ⲙⲁ ⲡⲉⲧⲉⲩⲛ̅ⲧⲁ’ⲩϥ ⲛ̅ⲥϩⲓⲙⲉ ⲟⲩϩ[.....] <text:line-break/><text:span text:style-name="T1"> </text:span><text:span text:style-name="T2">(87/29) </text:span> ⲡⲉ ⲛ̅ϩⲟ ⲛ̅ⲑⲏⲣⲓⲟⲛ ⲛⲉ ⲁⲩϥⲓ ⲛ̅ⲛⲟ̣[ⲩⲭⲟⲩⲥ] <text:line-break/><text:span text:style-name="T1"> </text:span><text:span text:style-name="T2">(87/30) </text:span> ⲉⲃⲟⲗ ϩⲙ̅ ⲡⲕⲁϩ ⲁⲩⲣ̅ⲡⲗⲁⲥⲥⲉ ⲙ̅ⲡ[ⲟⲩⲣⲱ]‐ <text:line-break/><text:span text:style-name="T1"> </text:span><text:span text:style-name="T2">(87/31) </text:span> ⲙⲉ ⲕⲁⲧⲁ ⲡⲟⲩⲥⲱⲙⲁ ⲁⲩⲱ ⲕ̣[ⲁⲧ]ⲁ̣ [ⲡⲓⲛⲉ] <text:line-break/><text:span text:style-name="T1"> </text:span><text:span text:style-name="T2">(87/32) </text:span> ⲙ̅ⲡⲛⲟⲩⲧⲉ ⲛ̅ⲧⲁϩⲟⲩⲱⲛϩ ⲉ̣[ⲃⲟⲗ ⲛⲁⲩ] <text:line-break/><text:span text:style-name="T1"> </text:span><text:span text:style-name="T2">(87/33) </text:span> ϩⲛ̅ⲛⲙⲙⲟⲟⲩ §ⲡⲉϫⲁⲩ ϫⲉ ⲁ[ⲙⲏⲉⲓⲧⲛ̅ ⲙⲁ]‐ <text:line-break/><text:soft-page-break/><text:span text:style-name="T1"> </text:span><text:span text:style-name="T2">(87/34) </text:span> ⲣⲛ̅ⲧⲉϩ’ⲟϥ ϩⲙ̅ ⲡⲛ̅ⲡⲗⲁⲥⲙⲁ ϫ̣[ⲉⲕⲁⲁⲥ] <text:line-break/><text:span text:style-name="T1"> </text:span><text:span text:style-name="T2">(87/35) </text:span> ⲉϥⲛⲁⲛⲁⲩ ⲁⲡⲉϥϣⲃⲣ̅ⲉⲓ̣[ⲛⲉ.......] <text:line-break/><text:span text:style-name="T1"> </text:span><text:span text:style-name="T2">(88/1) </text:span> [ⲛ̅]ⲧⲛ̅ⲉⲙⲁϩⲧⲉ ⲙ̅ⲙⲟϥ ϩⲙ̅ ⲡⲙ̅ⲡⲗⲁⲥⲙⲁ ⲉⲩⲣ̅ⲛⲟ‐ <text:line-break/><text:span text:style-name="T1"> </text:span><text:span text:style-name="T2">(88/2) </text:span> [ⲉ]ⲓ̣ ⲁⲛ ⲛ̅ⲧⲇⲩⲛⲁⲙⲓⲥ ⲙ̅ⲡⲛⲟⲩⲧⲉ ⲉⲃⲟⲗ ϩⲛ̅ <text:line-break/><text:span text:style-name="T1"> </text:span><text:span text:style-name="T2">(88/3) </text:span> ⲧ̣ⲟⲩⲙⲛ̅ⲧ̅ⲁ’ⲧϭⲟⲙ ⲁⲩⲱ ⲁϥⲛⲓϥⲉ ⲉϩⲟⲩⲛ̣ ϩⲙ̅ <text:line-break/><text:span text:style-name="T1"> </text:span><text:span text:style-name="T2">(88/4) </text:span> ⲡⲉϥϩⲟ ⲁⲩⲱ ⲁⲡⲣⲱⲙⲉ ϣⲱⲡⲉ ⲙ̅ⲯⲩⲭⲓⲕⲟⲥ <text:line-break/><text:span text:style-name="T1"> </text:span><text:span text:style-name="T2">(88/5) </text:span> ϩⲓϫⲙ̅ ⲡⲕⲁϩ ⲛ̅ϩⲁϩ ⲛ̅ϩⲟⲟⲩ ⲙ̅ⲡⲟⲩϣϭⲛ̅ ϭⲟ’ⲙ <text:line-break/><text:span text:style-name="T1"> </text:span><text:span text:style-name="T2">(88/6) </text:span> ϭⲉ ⲛ̅ⲧⲟⲩⲛⲟ’ⲥϥ ⲉⲧⲃⲉ ⲧⲟⲩⲙ̅ⲛ̅ⲧ̅ⲁ’ⲧϭⲟⲙ ⲁⲩ‐ <text:line-break/><text:span text:style-name="T1"> </text:span><text:span text:style-name="T2">(88/7) </text:span> ⲡⲣⲟⲥ’ⲕⲁⲣⲧⲉⲣⲉⲓ ⲛ̅ⲑⲉ ⲛ̅ⲛⲓϩⲁⲧⲏⲟⲩ ϫⲉ ⲉⲩⲛⲁ‐ <text:line-break/><text:span text:style-name="T1"> </text:span><text:span text:style-name="T2">(88/8) </text:span> ϭⲱⲣϭ ⲁⲡⲉⲓⲛⲉ ⲉⲧⲙ̅ⲙⲁⲩ ⲡⲁⲉⲓ ⲛ̅ⲧⲁϩⲟⲩⲱⲛϩ <text:line-break/><text:span text:style-name="T1"> </text:span><text:span text:style-name="T2">(88/9) </text:span> ⲉⲃⲟⲗ ⲛⲁⲩ ϩⲛ̅ⲛⲙ̅ⲙⲟⲟⲩ ⲛⲉⲩⲥⲟⲟⲩ’ⲛ ⲇⲉ ⲁ’ⲛ <text:line-break/><text:span text:style-name="T1"> </text:span><text:span text:style-name="T2">(88/10) </text:span> ⲛ̅ⲧⲉϥϭⲟⲙ ϫⲉ ⲛⲓⲙ ⲡⲉ §ⲛⲁⲉⲓ ⲇⲉ ⲧⲏⲣⲟⲩ ⲁⲩϣⲱ‐ <text:line-break/><text:span text:style-name="T1"> </text:span><text:span text:style-name="T2">(88/11) </text:span> ⲡⲉ ϩⲙ̅ ⲡⲟⲩⲱ’ϣ ⲙ̅ⲡⲉⲓⲱ’ⲧ ⲙ̅ⲡⲧⲏ’ⲣϥ ⲙ̅ⲙⲛ̅‐ <text:line-break/><text:span text:style-name="T1"> </text:span><text:span text:style-name="T2">(88/12) </text:span> ⲛ̅ⲥⲁ ⲛⲁⲉ’ⲓ ⲁⲡ̅ⲛ̅ⲁ̅ ⲛⲁⲩ ⲁⲡⲓⲣⲱⲙⲉ ⲛ̅ⲯⲩⲭⲓⲕⲟⲥ <text:line-break/><text:span text:style-name="T1"> </text:span><text:span text:style-name="T2">(88/13) </text:span> ϩⲓϫⲙ̅ ⲡⲕⲁϩ ⲁⲩⲱ ⲁⲡⲡ̅ⲛ̅ⲁ̅ ⲉⲓ ⲉⲃⲟⲗ ϩⲙ̅ ⲡⲕⲁϩ <text:line-break/><text:span text:style-name="T1"> </text:span><text:span text:style-name="T2">(88/14) </text:span> ⲛ̅ⲁⲇⲁⲙⲁ’ⲛⲧⲓⲛ’ⲏ ⲁϥⲉⲓ ⲉⲡⲓⲧⲛ̅ ⲁϥⲟⲩⲱϩ ⲛ̅‐ <text:line-break/><text:span text:style-name="T1"> </text:span><text:span text:style-name="T2">(88/15) </text:span> ϩⲏ’ⲧϥ ⲁⲡⲣⲱⲙⲉ ⲉⲧⲙ̅ⲙⲁⲩ ϣⲱⲡⲉ ⲁⲩⲯⲩⲭ’ⲏ <text:line-break/><text:span text:style-name="T1"> </text:span><text:span text:style-name="T2">(88/16) </text:span> ⲉⲥⲟⲛϩ §ⲁϥⲙⲟⲩⲧⲉ ⲉⲡ’ⲉϥⲣⲁⲛ ϫⲉ ⲁⲇⲁ’ⲙ ϫⲉ <text:line-break/><text:span text:style-name="T1"> </text:span><text:span text:style-name="T2">(88/17) </text:span> ⲁⲩϩⲉ ⲅⲁ’ⲣ ⲉⲣ’ⲟϥ ⲉϥⲕⲉⲓ’ⲙ ϩⲓϫⲙ̅ ⲡⲕⲁϩ ⲁⲩⲥⲙⲏ <text:line-break/><text:span text:style-name="T1"> </text:span><text:span text:style-name="T2">(88/18) </text:span> ⲉⲓ ⲉⲃⲟⲗ ϩⲛ̅ ⲧⲙⲛ̅ⲧ̅ⲁⲧⲧⲁⲕⲟ ⲉⲧⲃⲉ ⲧⲃⲟⲏⲑⲓⲁ <text:line-break/><text:span text:style-name="T1"> </text:span><text:span text:style-name="T2">(88/19) </text:span> ⲛ̅ⲁ’ⲇⲁ’ⲙ ⲁⲩⲱ ⲁⲛⲁⲣⲭⲱ’ⲛ ⲥⲱⲟⲩϩ ⲉϩⲟⲩ’ⲛ <text:line-break/><text:span text:style-name="T1"> </text:span><text:span text:style-name="T2">(88/20) </text:span> ⲛ̅ⲛ̅ⲑ’ⲏⲣⲓⲟ’ⲛ ⲧⲏⲣⲟϥ ⲙ̅ⲡⲕⲁϩ ⲙⲛ̅ ⲛ̅ϩⲁⲗⲁⲧⲉ <text:line-break/><text:span text:style-name="T1"> </text:span><text:span text:style-name="T2">(88/21) </text:span> ⲧ’ⲏⲣⲟⲩ ⲛ̅ⲧⲡⲉ ⲁⲩⲛ̅ⲧⲟⲩ ⲉϩⲟⲩ’ⲛ ϣⲁ ⲁⲇⲁ’ⲙ <text:line-break/><text:span text:style-name="T1"> </text:span><text:span text:style-name="T2">(88/22) </text:span> ⲉⲛⲁⲩ ϫⲉⲁⲇⲁ’ⲙ ⲛⲁⲙⲟⲩⲧⲉ ⲉⲣⲟⲟⲩ ϫⲉ ⲛⲓ’ⲙ <text:line-break/><text:span text:style-name="T1"> </text:span><text:span text:style-name="T2">(88/23) </text:span> ⲉ̣ⲧⲣⲉϥϯ ⲣⲁⲛ ⲉⲡⲟⲩⲁ ⲡⲟⲩⲁ ϩⲛ̅ ⲛ̅ϩⲁⲗⲁⲧⲉ <text:line-break/><text:span text:style-name="T1"> </text:span><text:span text:style-name="T2">(88/24) </text:span> ⲙⲛ̅ ⲛ̅ⲧⲃ̅ⲏⲟⲟⲩⲉ ⲧⲏⲣⲟⲩ §ⲁⲩϥⲉⲓ ⲛ̅ⲁⲇⲁ’ⲙ <text:line-break/><text:span text:style-name="T1"> </text:span><text:span text:style-name="T2">(88/25) </text:span> [ⲁ]ⲩⲕⲁ̣’ⲁ̣ϥ ϩⲙ̅ ⲡⲡⲁⲣⲁⲇⲉⲓⲥⲟⲥ ⲉⲧⲣⲉϥⲣ̅ ϩⲱ’ⲃ <text:line-break/><text:span text:style-name="T1"> </text:span><text:span text:style-name="T2">(88/26) </text:span> [ⲉⲣⲟϥ]’ ⲛ̅ϥⲁⲣⲉϩ ⲉⲣⲟϥ’ ⲁⲩⲱ ⲁⲛⲁⲣⲭⲱⲛ ϩⲱⲛ’ <text:line-break/><text:span text:style-name="T1"> </text:span><text:span text:style-name="T2">(88/27) </text:span> [ⲉⲧⲟ]ⲟ̣ⲧϥ’ ⲉⲩϫⲱ ⲙ̅ⲙⲟⲥ ϫⲉ ⲉⲃⲟⲗ ϩⲛ̅ ϣⲏⲛ <text:line-break/><text:span text:style-name="T1"> </text:span><text:span text:style-name="T2">(88/28) </text:span> [ⲛⲓⲙ] ⲉ̣ⲧϩⲙ̅ ⲡⲁⲣⲁⲇⲓⲥⲟⲥ ⲉⲕⲛⲁⲟⲩⲱⲙ’ <text:line-break/><text:span text:style-name="T1"> </text:span><text:span text:style-name="T2">(88/29) </text:span> [ⲉⲃⲟⲗ] ⲇⲉ ϩⲙ̅ ⲡϣⲏⲛ ⲛ̅ⲥⲟⲩⲱⲛ ⲡⲉⲧⲛⲁ’‐ <text:line-break/><text:span text:style-name="T1"> </text:span><text:span text:style-name="T2">(88/30) </text:span> [ⲛⲟⲩϥ] ⲙⲛ̣̅ ⲡⲉⲑⲟⲟⲩ ⲙ̅ⲡⲣ̅ⲟⲩⲱⲙ’ ⲟⲩⲇⲉ <text:line-break/><text:span text:style-name="T1"> </text:span><text:span text:style-name="T2">(88/31) </text:span> [ⲙ̅ⲡⲣ̅ϫⲱϩ ⲉ]ⲣⲟϥ’ ϫⲉ ⲫⲟⲟⲩ ⲉⲧⲉⲧⲛⲁⲟⲩⲱⲙ’ <text:line-break/><text:span text:style-name="T1"> </text:span><text:span text:style-name="T2">(88/32) </text:span> [ⲉⲃⲟⲗ ⲛ̅ϩⲏⲧ]ϥ’ ϩⲛ̅ ⲟⲩⲙⲟⲩ ⲧⲉⲧⲛⲁⲙⲟⲩ §ⲥⲉ‐ <text:line-break/><text:span text:style-name="T1"> </text:span><text:span text:style-name="T2">(88/33) </text:span> [.....] ⲡⲁⲓ̈ ⲥⲉⲥⲟⲟⲩⲛ ⲁⲛ’ ϫⲉ ⲟⲩ ⲡⲉⲛ‐ <text:line-break/><text:span text:style-name="T1"> </text:span><text:span text:style-name="T2">(88/34) </text:span> [ⲧⲁⲩϫⲟⲟ]ϥ̣ ⲛⲁϥ’ ⲁⲗⲗⲁ ϩⲙ̅ ⲡⲟⲩⲱϣ ⲙ̅ⲡⲉⲓ‐ <text:line-break/><text:span text:style-name="T1"> </text:span><text:span text:style-name="T2">(89/1) </text:span> ⲱⲧ’ ⲛ̅ⲧⲁⲩϫⲉ ⲡⲁⲉⲓ ⲛ̅ⲧⲉⲉⲓϩⲉ ϫⲉⲕⲁⲁⲥ ⲉϥ‐ <text:line-break/><text:span text:style-name="T1"> </text:span><text:span text:style-name="T2">(89/2) </text:span> ⲛⲁⲟⲩⲱⲙ’ ⲛ̅ⲧⲉ ⲁⲇⲁⲙ’ 〈ⲧⲙ̅〉 ⟦ⲱⲡ⟧ ⲛⲁⲩ ⲉⲣⲟⲟⲩ ⲉϥⲟ ⲧⲏ̣ⲣ̣[ϥ] <text:line-break/><text:span text:style-name="T1"> </text:span><text:span text:style-name="T2">(89/3) </text:span> ⲛ̅ϩⲩⲗⲓⲕⲟⲥ §ⲁⲛⲁⲣⲭⲱⲛ ϣⲟϫⲛⲉ ⲙⲛ̅ ⲛⲟⲩ‐ <text:line-break/><text:span text:style-name="T1"> </text:span><text:span text:style-name="T2">(89/4) </text:span> ⲉⲣⲏⲩ ⲡⲉϫⲁⲩ ϫⲉ ⲁⲙⲏⲉⲓⲧⲛ̅ ⲛ̅ⲧⲛ̅ⲉⲓⲛⲉ ⲛ̅‐ <text:line-break/><text:span text:style-name="T1"> </text:span><text:span text:style-name="T2">(89/5) </text:span> ⲟⲩⲃϣⲉ ⲉϩⲣⲁⲓ̈ ⲉϫⲛ̅ ⲁⲇⲁⲙ ⲁⲩⲱ ⲁϥϩⲱⲣⲡ’ <text:line-break/><text:span text:style-name="T1"> </text:span><text:span text:style-name="T2">(89/6) </text:span> ⲧⲃ̅ϣⲉ ⲇⲉ ⲧⲉ ⲧ’ⲙⲛ̅ⲧ̅ⲁⲧⲥⲟⲟⲩⲛ’ ⲧⲁⲉⲓ ⲛ̅ⲧⲁⲩ‐ <text:line-break/><text:span text:style-name="T1"> </text:span><text:span text:style-name="T2">(89/7) </text:span> ⲛ̅ⲧⲥ̅ ⲉϩⲣⲁⲓ̈ ⲉϫⲱϥ’ ⲁⲩⲱ ⲁϥϩⲱⲣⲡ’ ⲁⲩⲟⲩⲉⲛ <text:line-break/><text:span text:style-name="T1"> </text:span><text:span text:style-name="T2">(89/8) </text:span> ⲙ̅ⲡⲉϥⲥⲡⲓⲣ’ ⲛ̅ⲑⲉ ⲛ̅ⲛⲟⲩⲥϩⲓⲙⲉ ⲉⲥⲟⲛϩ <text:line-break/><text:span text:style-name="T1"> </text:span><text:span text:style-name="T2">(89/9) </text:span> ⲁⲩⲱ ⲁⲩⲕⲱⲧ’ ⲙ̅ⲡⲉϥ’ⲥⲡⲓⲣ’ ⲛ̅ⲛⲟⲩⲥⲁⲣⲝ <text:line-break/><text:span text:style-name="T1"> </text:span><text:span text:style-name="T2">(89/10) </text:span> ⲉⲡⲉⲥⲙⲁ ⲁⲩⲱ ⲁⲁⲇⲁⲙ’ ϣⲱⲡⲉ ⲙ̅ⲯⲩⲭⲓ‐ <text:line-break/><text:span text:style-name="T1"> </text:span><text:span text:style-name="T2">(89/11) </text:span> ⲕⲟⲥ ⲧⲏⲣϥ §ⲁⲩⲱ ⲧⲥϩⲓⲙⲉ ⲙ̅ⲡⲛⲉⲩⲙⲁⲧⲓⲕⲏ <text:line-break/><text:soft-page-break/><text:span text:style-name="T1"> </text:span><text:span text:style-name="T2">(89/12) </text:span> ⲁⲥⲓ ϣⲁⲣⲟϥ’ ⲁⲥϣⲁϫⲉ ⲛⲙ̅ⲙⲁϥ’ ⲡⲉϫⲁⲥ <text:line-break/><text:span text:style-name="T1"> </text:span><text:span text:style-name="T2">(89/13) </text:span> ϫⲉ ⲧⲱⲟⲩⲛ ⲁⲇⲁⲙ ⲁⲩⲱ ⲛ̅ⲧⲁⲣⲉϥⲛⲁⲩ ⲉⲣⲟⲥ <text:line-break/><text:span text:style-name="T1"> </text:span><text:span text:style-name="T2">(89/14) </text:span> ⲡⲉϫⲁϥ ϫⲉ ⲛ̅ⲧⲟ ⲡⲉⲛ’ⲧⲁϩϯ ⲛⲁⲉⲓ ⲙ̅ⲡⲱⲛϩ <text:line-break/><text:span text:style-name="T1"> </text:span><text:span text:style-name="T2">(89/15) </text:span> ⲥⲉⲛⲁⲙⲟⲩⲧⲉ ⲉⲣⲟ ϫⲉ ⲧⲙⲁⲁⲩ ⲛ̅ⲛⲉⲧⲟⲛϩ <text:line-break/><text:span text:style-name="T1"> </text:span><text:span text:style-name="T2">(89/16) </text:span> ϫⲉ ⲛ̅ⲧⲟⲥ ⲡⲉ ⲧⲁⲙⲁⲁⲩ ⲛ̅ⲧⲟⲥ ⲧⲉ ⲧⲥⲟⲉⲓⲛ’ <text:line-break/><text:span text:style-name="T1"> </text:span><text:span text:style-name="T2">(89/17) </text:span> ⲁⲩⲱ ⲧⲥϩⲓⲙⲉ ⲁⲩⲱ ⲧⲉⲛⲧⲁⲥⲙⲓⲥⲉ §ⲁⲛⲉ‐ <text:line-break/><text:span text:style-name="T1"> </text:span><text:span text:style-name="T2">(89/18) </text:span> ⲝⲟⲩⲥⲓⲁ ⲇⲉ ⲉⲓ ⲉϩⲟⲩⲛ ϣⲁ ⲡⲟⲩⲁⲇⲁⲙ’ ⲛ̅ⲧⲁ <text:line-break/><text:span text:style-name="T1"> </text:span><text:span text:style-name="T2">(89/19) </text:span> ⲣⲟⲩⲛⲁⲩ ⲇⲉ ⲁⲧⲉϥ’ϣⲃⲣ̅ⲉⲓⲛⲉ ⲉⲥϣⲁϫⲉ ⲛⲙ̅‐ <text:line-break/><text:span text:style-name="T1"> </text:span><text:span text:style-name="T2">(89/20) </text:span> ⲙⲁϥ’ ⲁⲩϣⲧⲟⲣⲧⲣ̅ ϩⲛ̅ ⲟⲩⲛⲟϭ ⲛ̅ϣⲧⲟⲣⲧⲣ̅ <text:line-break/><text:span text:style-name="T1"> </text:span><text:span text:style-name="T2">(89/21) </text:span> ⲁⲩⲱ ⲁⲩⲙⲉⲣⲉⲓⲧⲥ̅ ⲡⲉϫⲁⲩ ⲛ̅ⲛⲟⲩⲉⲣⲏⲩ <text:line-break/><text:span text:style-name="T1"> </text:span><text:span text:style-name="T2">(89/22) </text:span> ϫⲉ ⲁⲙⲏⲉⲓⲧⲛ̅ ⲛ̅ⲧⲛ̅ⲛⲟⲩϫⲉ ⲙ̅ⲡⲛ̅ⲥⲡⲉⲣ’‐ <text:line-break/><text:span text:style-name="T1"> </text:span><text:span text:style-name="T2">(89/23) </text:span> ⲙⲁ ⲉϩⲣⲁⲓ̈ ⲉϫⲱⲥ’ ⲁⲩⲣ̅ⲇⲓⲱⲕⲉ ⲙ̅ⲙⲟⲥ ⲁⲩⲱ <text:line-break/><text:span text:style-name="T1"> </text:span><text:span text:style-name="T2">(89/24) </text:span> ⲁⲥⲥⲱⲃⲉ ⲛ̅ⲥⲱⲟⲩ ⲉⲃⲟⲗ ϩⲛ̅ ⲧⲟⲩⲙ̅ⲛ̅ⲁⲧ’‐ <text:line-break/><text:span text:style-name="T1"> </text:span><text:span text:style-name="T2">(89/25) </text:span> ⲑⲏⲧ’ ⲙⲛ̅ ⲧⲟⲩⲙⲛ̅ⲧ̅ⲃⲗ̅ⲗⲉ ⲁⲩⲱ ⲁⲥⲣ̅ ⲟⲩϣⲏⲛ <text:line-break/><text:span text:style-name="T1"> </text:span><text:span text:style-name="T2">(89/26) </text:span> ⲛ̅ⲧⲟⲟⲧⲟⲩ ⲁⲥⲕⲱ ⲛ̅ⲧⲉⲥϩⲁⲓ̈ⲃⲉⲥ ⲉ̣[ⲥ]ⲉⲓⲛⲉ̣ <text:line-break/><text:span text:style-name="T1"> </text:span><text:span text:style-name="T2">(89/27) </text:span> ⲙ̅ⲙⲟⲥ ϩⲁⲧⲟⲟⲧⲟⲩ ⲁⲩⲱ ⲁⲩϫⲟϩⲙ[ⲉⲥ] ϩⲛ̅ <text:line-break/><text:span text:style-name="T1"> </text:span><text:span text:style-name="T2">(89/28) </text:span> ⲟⲩⲥⲱϥ’ ⲁⲩⲱ ⲁⲩϫⲱϩⲙ̅ ⲛ̅ⲧⲥⲫⲣⲁⲅⲓ̣[ⲥ] ⲛ̅‐ <text:line-break/><text:span text:style-name="T1"> </text:span><text:span text:style-name="T2">(89/29) </text:span> ⲧⲉⲥⲥⲙⲏ ϣⲓⲛⲁ ⲉⲩⲛⲁⲣ̅ⲕⲁⲧⲁⲕⲣⲓⲛ̣[ⲉ] ⲙ̣̅‐ <text:line-break/><text:span text:style-name="T1"> </text:span><text:span text:style-name="T2">(89/30) </text:span> ⲙⲟⲟⲩ ⲟⲩⲁⲁⲩ ϩⲙ̅ ⲡⲟⲩⲡⲗⲁⲥⲙⲁ ⲙ̣[ⲛ̅ ⲡⲟⲩ]‐ <text:line-break/><text:span text:style-name="T1"> </text:span><text:span text:style-name="T2">(89/31) </text:span> ⲉⲓⲛⲉ §ⲁⲥⲉⲓ ⲇⲉ ⲛ̅ϭⲓ ϯⲡⲛⲉⲩⲙⲁⲧⲓⲕ̣[ⲏ ϩⲙ̅] <text:line-break/><text:span text:style-name="T1"> </text:span><text:span text:style-name="T2">(89/32) </text:span> ⲫⲁϥ’ ⲡⲣⲉϥⲧⲁⲙⲟ’ ⲁⲩⲱ ⲁϥⲧⲁ̣[ⲙⲟⲟⲩ ⲉϥ]‐ <text:line-break/><text:span text:style-name="T1"> </text:span><text:span text:style-name="T2">(89/33) </text:span> ϫⲱ ⲙ̅ⲙⲟⲥ ϫⲉ ⲟⲩ ⲡⲉⲛ̅ⲧⲁϥ̣[ϫⲟⲟϥ ⲛⲏ]‐ <text:line-break/><text:span text:style-name="T1"> </text:span><text:span text:style-name="T2">(89/34) </text:span> ⲧⲛ̅ ϫⲉ ⲉⲃⲟⲗ ϩⲛ̅ ϣⲏⲛ ⲛⲓⲙ ϩ[ⲙ̅ ⲡⲡⲁⲣⲁ]‐ <text:line-break/><text:span text:style-name="T1"> </text:span><text:span text:style-name="T2">(89/35) </text:span> ϫⲉⲓⲥⲟⲥ ⲉⲕⲛⲁⲟⲩⲱⲙ’ ⲉⲃⲟⲗ ⲇ̣[ⲉ ϩⲙ̅ ⲡϣⲏⲛ’] <text:line-break/><text:span text:style-name="T1"> </text:span><text:span text:style-name="T2">(90/1) </text:span> ⲛ̣̅ⲥⲟⲩⲱⲛ ⲡⲉⲑⲟⲟⲩ ⲙⲛ̅ ⲡⲉⲧⲛⲁⲛⲟⲩϥ’ <text:line-break/><text:span text:style-name="T1"> </text:span><text:span text:style-name="T2">(90/2) </text:span> ⲙ̅ⲡⲣ̅ⲟⲩⲱⲙ §ⲡⲉϫⲉ ⲧⲥϩⲓⲙⲉ ⲛ̅ⲥⲁⲣⲕⲓⲕⲏ ϫⲉ <text:line-break/><text:span text:style-name="T1"> </text:span><text:span text:style-name="T2">(90/3) </text:span> ⲟⲩ ⲙⲟⲛⲟⲛ’ ⲡⲉϫⲁϥ ϫⲉ ⲙⲛ̅ⲟⲩⲱⲙ ⲁⲗⲗⲁ <text:line-break/><text:span text:style-name="T1"> </text:span><text:span text:style-name="T2">(90/4) </text:span> ⲙ̅ⲡⲣ̅ϫⲱϩ ⲉⲣⲟϥ ϫⲉ ϩⲙ̅ ⲡϩⲟⲟⲩ ⲉⲧⲉⲧⲛⲁⲟⲩ‐ <text:line-break/><text:span text:style-name="T1"> </text:span><text:span text:style-name="T2">(90/5) </text:span> ⲱⲙ’ ⲉⲃⲟⲗ ⲛ̅ϩⲏⲧϥ’ ϩⲛ̅ⲛⲟⲩⲙⲟⲩ ⲧⲉⲧⲛⲁⲙⲟⲩ <text:line-break/><text:span text:style-name="T1"> </text:span><text:span text:style-name="T2">(90/6) </text:span> §ⲁⲩⲱ ⲡⲉϫⲉ ⲫⲁϥ’ ⲡⲣⲉϥⲧⲁⲙⲟ ϫⲉ ϩⲛ̅ ⲟⲩⲙⲟⲩ <text:line-break/><text:span text:style-name="T1"> </text:span><text:span text:style-name="T2">(90/7) </text:span> ⲉⲧⲉⲧⲛⲁⲙⲟⲩ ⲁⲛ ⲛ̅ⲧⲁϥϫⲉ ⲡⲁⲉⲓ ⲅⲁⲣ ⲛⲏⲧⲛ̅ <text:line-break/><text:span text:style-name="T1"> </text:span><text:span text:style-name="T2">(90/8) </text:span> ⲉϥⲣ̅ⲫⲑⲟⲛⲉⲓ ⲙⲁⲗⲗⲟⲛ ⲉⲛⲉⲧⲛ̅ⲃⲁⲗ ⲛⲁⲟⲩ‐ <text:line-break/><text:span text:style-name="T1"> </text:span><text:span text:style-name="T2">(90/9) </text:span> ⲉⲛ ⲛ̅ⲧⲉⲧⲛ̅ϣⲱⲡⲉ ⲛ̅ⲑⲉ ⲛ̅ⲛⲓⲛⲟⲩⲧⲉ ⲉⲧⲉ‐ <text:line-break/><text:span text:style-name="T1"> </text:span><text:span text:style-name="T2">(90/10) </text:span> ⲧⲛ̅ⲥⲟⲟⲩⲛ ⲙ̅ⲡ’ⲡⲉⲑⲟⲟⲩ ⲙⲛ̅ ⲡⲉⲧⲛⲁⲛⲟⲩϥ’ <text:line-break/><text:span text:style-name="T1"> </text:span><text:span text:style-name="T2">(90/11) </text:span> ⲁⲩⲱ ⲧⲣⲉϥⲧⲁⲙⲟ ⲁⲩϥⲓⲧⲥ̅ ⲛ̅ⲧⲟⲟⲧϥ’ ⲙ̅ⲫⲁϥ’ <text:line-break/><text:span text:style-name="T1"> </text:span><text:span text:style-name="T2">(90/12) </text:span> ⲁⲩⲱ ⲁⲥⲕⲱ ⲙ̅ⲙⲟϥ’ ⲟⲩⲁⲁϥ’ ⲉϥⲟ ⲛ̅ⲣⲙⲛ̅ⲕⲁϩ <text:line-break/><text:span text:style-name="T1"> </text:span><text:span text:style-name="T2">(90/13) </text:span> §ⲁⲩⲱ ⲧⲥϩⲓⲙⲉ ⲛ̅ⲥⲁⲣⲕⲓⲕⲏ ⲁⲥϫⲓ ⲉⲃⲟⲗ ϩⲙ̅ ⲡϣⲏⲛ <text:line-break/><text:span text:style-name="T1"> </text:span><text:span text:style-name="T2">(90/14) </text:span> ⲁⲥⲟⲩⲱⲙ ⲁⲩⲱ ⲁⲥϯ ⲙ̅ⲡⲉⲥϩⲁⲓ̈ ⲛⲙ̅ⲙⲁⲥ ⲁⲩ‐ <text:line-break/><text:span text:style-name="T1"> </text:span><text:span text:style-name="T2">(90/15) </text:span> ⲱ ⲁⲙⲯⲩⲭⲓⲕⲟⲥ ⲟⲩⲱⲙ ⲁⲩⲱ ⲁⲧⲟⲩⲕⲁⲕⲓⲁ <text:line-break/><text:span text:style-name="T1"> </text:span><text:span text:style-name="T2">(90/16) </text:span> ⲟⲩⲉⲛ’ ⲉⲃⲟⲗ ϩⲛ̅ ⲧⲟⲩⲙⲛ̅ⲧ̅ⲁⲧⲥⲟⲟⲩⲛ ⲁⲩⲱ’ <text:line-break/><text:span text:style-name="T1"> </text:span><text:span text:style-name="T2">(90/17) </text:span> ⲁⲩⲉⲓⲙⲉ ϫⲉ ⲛⲉⲩⲕⲏⲕⲁϩⲏⲩ ⲁⲡⲡⲛⲉⲩⲙⲁ’‐ <text:line-break/><text:span text:style-name="T1"> </text:span><text:span text:style-name="T2">(90/18) </text:span> ⲧⲓⲕⲟⲛ ⲁⲩϥⲓ ϩⲛ̅ϭⲱⲃⲉ ⲛ̅ⲕⲛ̅ⲧⲉ ⲁⲩⲙⲟⲣⲟϥ <text:line-break/><text:span text:style-name="T1"> </text:span><text:span text:style-name="T2">(90/19) </text:span> ⲉϫⲛ̅ ⲧⲟⲩϯⲡⲉ §ⲧⲟⲧⲉ ⲁϥⲉⲓ ⲛ̅ϭⲓ ⲡⲛⲟϭ ⲛ̅ⲁⲣ‐ <text:line-break/><text:span text:style-name="T1"> </text:span><text:span text:style-name="T2">(90/20) </text:span> ⲭⲱⲛ ⲁⲩⲱ ⲡⲉϫⲁϥ ϫⲉ ⲁⲇⲁⲙ’ ⲉⲕⲧⲱⲛ ⲛⲉϥ‐ <text:line-break/><text:span text:style-name="T1"> </text:span><text:span text:style-name="T2">(90/21) </text:span> ⲥⲟⲟⲩⲛ ⲅⲁⲣ ⲁⲛ ϫⲉ ⲛ̅ⲧⲁ ⲟⲩ ϣⲱⲡⲉ §ⲁⲩⲱ ⲡⲉ‐ <text:line-break/><text:span text:style-name="T1"> </text:span><text:span text:style-name="T2">(90/22) </text:span> ϫⲉ ⲁⲇⲁⲙ ϫⲉ ⲁⲉⲓⲥⲱⲧⲙ̅ ⲁⲧⲉⲕ’ⲥⲙⲏ ⲁⲉⲓⲣ̅ <text:line-break/><text:span text:style-name="T1"> </text:span><text:span text:style-name="T2">(90/23) </text:span> ϩⲟⲧⲉ ϫⲉ ⲛⲉⲉⲓⲕⲏⲕⲁϩⲏⲩ ⲁⲩⲱ ⲁⲉⲓⲕⲱⲡ’ <text:line-break/><text:soft-page-break/><text:span text:style-name="T1"> </text:span><text:span text:style-name="T2">(90/24) </text:span> §ⲡⲉϫⲉ ⲡⲁⲣⲭⲱⲛ ϫⲉ ⲉⲧⲃⲉ ⲟⲩ’ ⲁⲕⲕⲱⲡ ⲉⲓ <text:line-break/><text:span text:style-name="T1"> </text:span><text:span text:style-name="T2">(90/25) </text:span> ⲙⲏⲧⲓ ϫⲉ ⲁⲕ’ⲟⲩⲱⲙ’ ⲉⲃⲟⲗ ϩⲙ̅ ⲡϣⲏⲛ <text:line-break/><text:span text:style-name="T1"> </text:span><text:span text:style-name="T2">(90/26) </text:span> ⲛ̅ⲧ[ⲁ]ⲉⲓϩⲟⲛϥ ⲉⲧⲟⲟⲧⲕ ϫⲉ ⲙ̅ⲡⲣ̅ⲟⲩⲱⲙ’ ⲉ‐ <text:line-break/><text:span text:style-name="T1"> </text:span><text:span text:style-name="T2">(90/27) </text:span> ⲃⲟ[ⲗ] ⲛ̅ϩⲏⲧϥ’ ⲟⲩⲁⲁⲧϥ ⲁⲩⲱ ⲁⲕⲟⲩⲱⲙ §ⲡⲉ‐ <text:line-break/><text:span text:style-name="T1"> </text:span><text:span text:style-name="T2">(90/28) </text:span> ϫ̣[ⲉ ⲁ]ⲇⲁⲙ ϫⲉ ⲧⲥϩⲓⲙⲉ ⲛ̅ⲧⲁⲕⲧⲁⲁⲥ ⲛⲁⲉⲓ <text:line-break/><text:span text:style-name="T1"> </text:span><text:span text:style-name="T2">(90/29) </text:span> [ⲁⲥϯ] ⲛⲁⲉⲓ ⲁⲉⲓⲟⲩⲱⲙ’ ⲁⲩⲱ ⲁⲡⲁⲩⲑⲁⲇⲏⲥ <text:line-break/><text:span text:style-name="T1"> </text:span><text:span text:style-name="T2">(90/30) </text:span> [ⲛ̅ⲁⲣ]ⲭ̣ⲱⲛ ⲥϩⲟⲩⲟⲣ ⲧⲥϩⲓⲙⲉ §ⲡⲉϫⲉ ⲧⲥϩⲓⲙⲉ <text:line-break/><text:span text:style-name="T1"> </text:span><text:span text:style-name="T2">(90/31) </text:span> [ϫⲉ ⲫ]ⲟ̣ϥ ⲡⲉⲧⲁⲣ’ⲁⲡⲁⲧⲁ ⲙ̅ⲙⲟⲉⲓ ⲁⲉⲓⲟⲩⲱⲙ’ <text:line-break/><text:span text:style-name="T1"> </text:span><text:span text:style-name="T2">(90/32) </text:span> [ⲁⲩⲕⲟⲧⲟ]ⲩ̣ ⲁⲫⲟϥ ⲁⲩⲥⲟⲩϩⲱⲣ’ ⲧⲉϥϩⲁⲓ̈ⲃⲉⲥ <text:line-break/><text:span text:style-name="T1"> </text:span><text:span text:style-name="T2">(90/33) </text:span> [.....ⲟ]ⲩⲁⲧϭⲟⲙ ⲡⲉ ⲉⲩⲥⲟⲟⲩⲛ ⲁⲛ <text:line-break/><text:span text:style-name="T1"> </text:span><text:span text:style-name="T2">(90/34) </text:span> [ϫⲉ ⲡⲟ]ⲩⲡⲗⲁⲥⲙⲁ ⲡⲉ ϫⲓⲙ ⲫⲟⲟⲩ ⲉⲧⲙ̅‐ <text:line-break/><text:span text:style-name="T1"> </text:span><text:span text:style-name="T2">(91/1) </text:span> ⲙⲁⲩ ⲁⲫⲟϥ’ ϣⲱⲡⲉ ϩⲁ ⲡⲥⲁϩⲟⲩⲉ ⲛ̅ⲉⲝⲟⲩⲥⲓ̣[ⲁ] <text:line-break/><text:span text:style-name="T1"> </text:span><text:span text:style-name="T2">(91/2) </text:span> ϣⲁⲛⲧⲉϥ’ⲉⲓ ⲛ̅ϭⲓ ⲡⲧⲉⲗⲉⲓⲟⲥ ⲛ̅ⲣⲱⲙⲉ ⲡⲥ̣[ⲁ]‐ <text:line-break/><text:span text:style-name="T1"> </text:span><text:span text:style-name="T2">(91/3) </text:span> ϩⲟⲩ ⲉⲧⲙ̅ⲙⲁⲩ ⲁϥⲉⲓ ⲉϫⲛ̅ ⲫⲁϥ’ §ⲁⲩⲕⲟⲧⲟⲩ ⲁ‐ <text:line-break/><text:span text:style-name="T1"> </text:span><text:span text:style-name="T2">(91/4) </text:span> ⲡⲟⲩⲁⲇⲁⲙ’ ⲁⲩϥⲓⲧϥ’ ⲁⲩⲛⲟϫϥ’ ⲉⲃⲟⲗ ϩⲙ ⲡⲡⲁ‐ <text:line-break/><text:span text:style-name="T1"> </text:span><text:span text:style-name="T2">(91/5) </text:span> ⲣⲁⲇⲉⲓⲥⲟⲥ ⲙⲛ̅ ⲧⲉϥϩⲓⲙⲉ ϫⲉ ⲙⲛ̅ ⲗⲁⲁⲩ ⲛ̅ⲥ‐ <text:line-break/><text:span text:style-name="T1"> </text:span><text:span text:style-name="T2">(91/6) </text:span> ⲙⲟⲩ ⲛ̅ⲧⲟⲟⲧⲟⲩ ϫⲉ ⲛ̅ⲧⲟⲟⲩ ϩⲱⲟⲩ ⲥⲉϣⲟⲟⲡ’ <text:line-break/><text:span text:style-name="T1"> </text:span><text:span text:style-name="T2">(91/7) </text:span> ϩⲁ ⲡⲥⲁϩⲟⲩⲉ §ⲁⲩⲛⲟⲩϫ’ ⲣ̅ⲣⲱⲙⲉ ⲇⲉ ⲉϩⲣⲁⲓ̈ <text:line-break/><text:span text:style-name="T1"> </text:span><text:span text:style-name="T2">(91/8) </text:span> ⲁϩⲛ̅ⲛⲟϭ ⲙ̅ⲡⲡⲉⲣⲓⲥⲡⲁⲥⲙⲟⲥ ⲙⲛ̅ ϩⲛ̅ⲙ̅ⲕⲁϩ <text:line-break/><text:span text:style-name="T1"> </text:span><text:span text:style-name="T2">(91/9) </text:span> ⲛ̅ⲧⲉ ⲡⲃⲓⲟⲥ ϣⲓⲛⲁ ⲉⲛⲟⲩⲣⲱⲙⲉ ⲛⲁϣⲱⲡⲉ <text:line-break/><text:span text:style-name="T1"> </text:span><text:span text:style-name="T2">(91/10) </text:span> ⲛ̅ⲃⲓⲱⲧⲓⲕⲟⲥ ⲛ̅ⲥⲉⲧⲙ̅ⲣ̅ⲥⲭⲟⲗⲁⲍⲉ ⲁⲣ̅ⲡⲣⲟⲥ‐ <text:line-break/><text:span text:style-name="T1"> </text:span><text:span text:style-name="T2">(91/11) </text:span> ⲕⲁⲣⲧⲉⲣⲉⲓ ⲉⲡ̣ⲡ̅ⲛ̅ⲁ̅ ⲉⲧⲟⲩⲁⲁⲃ §ⲙⲛ̅ⲛ̅ⲥⲁ ⲛⲁⲓ̈ <text:line-break/><text:span text:style-name="T1"> </text:span><text:span text:style-name="T2">(91/12) </text:span> ⲇⲉ ⲁⲥϫⲡⲟ ⲛ̅ⲕⲁⲓ̈ⲛ ⲡⲟⲩϣⲏⲣⲉ ⲕⲁⲓ̈ⲛ ⲇⲉ <text:line-break/><text:span text:style-name="T1"> </text:span><text:span text:style-name="T2">(91/13) </text:span> ⲛⲉϥⲣ̅ ϩⲱⲃ’ ⲉⲡⲕⲁϩ ⲡⲁⲗⲓⲛ’ ⲁϥⲥⲟⲩⲱⲛ ⲧⲉϥ’‐ <text:line-break/><text:span text:style-name="T1"> </text:span><text:span text:style-name="T2">(91/14) </text:span> ϩⲓⲙⲉ ⲉⲧⲓ ⲁⲥⲱ ⲁⲥϫⲡⲟ ⲛ̅ⲁⲃⲉⲗ ⲁⲃⲉⲗ ⲇⲉ <text:line-break/><text:span text:style-name="T1"> </text:span><text:span text:style-name="T2">(91/15) </text:span> ⲛⲉⲩϣⲱⲥ ⲡⲉ ⲙ̅ⲙⲁⲛⲉⲥⲟⲟⲩ ⲕⲁⲓ̈ⲛ ⲇⲉ ⲁϥⲉⲓ‐ <text:line-break/><text:span text:style-name="T1"> </text:span><text:span text:style-name="T2">(91/16) </text:span> ⲛⲉ ⲉϩⲟⲩⲛ ϩⲛ̅ ⲛ̅ⲕⲁⲣⲡⲟⲥ ⲛ̅ⲧⲉϥⲥⲱϣⲉ’ ⲁ‐ <text:line-break/><text:span text:style-name="T1"> </text:span><text:span text:style-name="T2">(91/17) </text:span> ⲃⲉⲗ ⲇⲉ’ ⲁϥⲉⲓⲛⲉ ⲉϩⲟⲩⲛ ⲛ̅ⲛⲟⲩⲑⲩⲥⲓⲁ ϩⲛ̅ <text:line-break/><text:span text:style-name="T1"> </text:span><text:span text:style-name="T2">(91/18) </text:span> ⲛⲉϥϩⲓⲉⲓⲃ’ ⲁⲡⲛⲟⲩⲧⲉ ϭⲱϣⲧ’ ⲉϫⲛ̅ ⲛ̅‐ <text:line-break/><text:span text:style-name="T1"> </text:span><text:span text:style-name="T2">(91/19) </text:span> ⲇⲱⲣⲟⲛ ⲛ̅ⲛⲁⲃⲉⲗ ⲙ̅ⲡⲉϥϫⲓ ⲇⲉ ⲛ̅ⲛ̅ⲇⲱ‐ <text:line-break/><text:span text:style-name="T1"> </text:span><text:span text:style-name="T2">(91/20) </text:span> ⲣⲟⲛ ⲛ̅ⲛⲕⲁⲓ̈ⲛ ⲁⲩⲱ ⲕⲁⲓ̈ⲛ ⲛ̅ⲥⲁⲣⲕⲓⲕⲟⲥ ⲁϥ‐ <text:line-break/><text:span text:style-name="T1"> </text:span><text:span text:style-name="T2">(91/21) </text:span> ⲇⲓⲱⲕⲉ ⲛ̅ⲁⲃⲉⲗ’ ⲡⲉϥⲥⲟⲛ §ⲁⲩⲱ ⲡⲉϫⲉ ⲡⲛⲟ̣[ⲩ]‐ <text:line-break/><text:span text:style-name="T1"> </text:span><text:span text:style-name="T2">(91/22) </text:span> ⲧⲉ ⲛ̅ⲕⲁⲓ̈ⲛ ϫⲉ ⲉϥⲧⲱⲛ’ ⲁⲃⲉⲗ’ ⲡⲉⲕⲥⲟⲛ <text:line-break/><text:span text:style-name="T1"> </text:span><text:span text:style-name="T2">(91/23) </text:span> §ⲁϥⲟⲩⲱϣⲃ̅ ⲡⲉϫⲁϥ ϫⲉ ⲙⲏ ⲉⲉⲓϣⲟⲟⲡ’ <text:line-break/><text:span text:style-name="T1"> </text:span><text:span text:style-name="T2">(91/24) </text:span> ⲙⲫⲩⲗⲁⲝ ⲙ̅ⲡⲁⲥⲟⲛ §ⲡⲉϫⲉ ⲡⲛⲟⲩⲧⲉ ⲛ̅‐ <text:line-break/><text:span text:style-name="T1"> </text:span><text:span text:style-name="T2">(91/25) </text:span> ⲕⲁⲓ̈ⲛ ϫⲉ ⲉⲓⲥ ⲧⲉⲥⲙⲏ ⲙ̅ⲡⲉⲥⲛⲟϥ ⲙ̅ⲡⲉⲕ‐ <text:line-break/><text:span text:style-name="T1"> </text:span><text:span text:style-name="T2">(91/26) </text:span> ⲥⲟⲛ ϥ〈ⲁ〉ϣⲕⲁⲕ’ ⲉϩⲣⲁⲓ̈ ⲉⲣⲟⲉⲓ ⲁⲕⲣ̅ ⲛ̣[ⲟ]ⲃⲉ ⲛ̣̅‐ <text:line-break/><text:span text:style-name="T1"> </text:span><text:span text:style-name="T2">(91/27) </text:span> ⲣⲱⲕ’ ϥⲛⲁⲕⲟⲧϥ’ ⲉⲣⲟⲕ ⲟⲩⲟⲛ ⲛⲓⲙ [ⲉⲧ]ⲛⲁ‐ <text:line-break/><text:span text:style-name="T1"> </text:span><text:span text:style-name="T2">(91/28) </text:span> ⲙⲟⲩⲟⲩⲧ’ ⲛ̅ⲕⲁⲉⲓⲛ ϥⲛⲁⲃⲱⲗ ⲉⲃⲟⲗ̣ [ⲛ̅]ⲥⲟϣ̣[ϥ] <text:line-break/><text:span text:style-name="T1"> </text:span><text:span text:style-name="T2">(91/29) </text:span> ⲛ̅ϫⲓ ⲕⲃⲁ ⲕⲛⲁϣⲱⲡⲉ ⲇⲉ ⲉⲕⲉϣ ⲉϩ̣[ⲟⲙ] ⲁ̣ⲩ̣‐ <text:line-break/><text:span text:style-name="T1"> </text:span><text:span text:style-name="T2">(91/30) </text:span> ⲱ ⲉⲕⲥⲧⲱⲧ’ ϩⲓϫⲛ̅ ⲡⲕⲁϩ §〈ⲁ〉ⲁⲇⲁⲙ ⲇⲉ [ⲥⲟⲟⲩⲛ] <text:line-break/><text:span text:style-name="T1"> </text:span><text:span text:style-name="T2">(91/31) </text:span> ⲛ̅ⲧⲉϥϣⲃⲣ̅ⲉⲓⲛⲉ ⲉⲩϩⲁ ⲁⲥⲱ ⲁⲥϫⲡⲉ̣ [ⲥⲏⲑ] <text:line-break/><text:span text:style-name="T1"> </text:span><text:span text:style-name="T2">(91/32) </text:span> ⲛ̅ⲁⲇⲁⲙ ⲁⲩⲱ ⲡⲉϫⲁⲥ ϫⲉ ⲁⲓ̈ϫⲡ̣ⲟ̣ ⲛ̣̅[ⲕⲉ]‐ <text:line-break/><text:span text:style-name="T1"> </text:span><text:span text:style-name="T2">(91/33) </text:span> ⲣⲱⲙⲉ ϩⲙ̅ ⲡⲛⲟⲩⲧⲉ ⲉⲡⲙⲁ [ⲛ̅ⲛⲁⲃⲉⲗ] <text:line-break/><text:span text:style-name="T1"> </text:span><text:span text:style-name="T2">(91/34) </text:span> §ⲡⲁⲗⲓⲛ ⲁⲥⲱ ⲛ̅ϭⲓ ⲉⲩϩⲁ ⲁⲥϫⲡ[ⲉ ⲛⲱⲣⲉⲁ] <text:line-break/><text:span text:style-name="T1"> </text:span><text:span text:style-name="T2">(91/35) </text:span> ⲁⲩⲱ ⲡⲉϫⲁⲥ ϫⲉ ⲁϥϫⲡⲟ ⲛⲁ̣[ⲉⲓ ⲛ̅ⲟⲩⲡⲁⲣ‐ <text:line-break/><text:span text:style-name="T1"> </text:span><text:span text:style-name="T2">(92/1) </text:span> ⲑⲉ]ⲛⲟⲥ ⲛ̅ⲃⲟⲏⲑⲉⲓⲁ [ϩⲛ̅] ⲛ̣̅ⲅⲉⲛⲉⲁ ⲛ̅ⲅⲉⲛⲉⲁ’ <text:line-break/><text:soft-page-break/><text:span text:style-name="T1"> </text:span><text:span text:style-name="T2">(92/2) </text:span> ⲛ̣̅ⲣ̅ⲣⲱⲙⲉ ⲧⲁⲉⲓ ⲧⲉ ⲧⲡⲁⲣⲑⲉⲛⲟⲥ ⲉⲧⲉ ⲙ̅ⲡⲉ ⲛ̅‐ <text:line-break/><text:span text:style-name="T1"> </text:span><text:span text:style-name="T2">(92/3) </text:span> ⲇⲩⲛⲁⲙⲓⲥ ϫⲁϩⲙⲉⲥ §ⲧⲟⲧⲉ ⲁⲛⲣⲱⲙⲉ ⲣ̅ⲁⲣⲭⲉⲓ <text:line-break/><text:span text:style-name="T1"> </text:span><text:span text:style-name="T2">(92/4) </text:span> ⲛ̅ⲛⲣ̅ⲁⲩⲝⲁⲛⲉ ⲁⲩⲱ ⲛ̅ⲥⲉⲁⲛⲁⲉⲓ §ⲁⲛⲁⲣⲭⲱⲛ ϣⲟ‐ <text:line-break/><text:span text:style-name="T1"> </text:span><text:span text:style-name="T2">(92/5) </text:span> ϫⲛⲉ ⲙⲛ̅ ⲛⲟⲩⲉⲣⲏⲩ ⲡⲉϫⲁⲩ ϫⲉ ⲁⲙⲏⲉⲓⲧⲛ̅ ⲛ̅‐ <text:line-break/><text:span text:style-name="T1"> </text:span><text:span text:style-name="T2">(92/6) </text:span> ⲧⲛ̅ⲧⲁⲙⲓⲟ ⲛ̅ⲛⲟⲩⲕⲁⲧⲁⲕⲗⲩⲥⲙⲟⲥ ⲉⲃⲟⲗ ϩⲛ̅ⲛ̅‐ <text:line-break/><text:span text:style-name="T1"> </text:span><text:span text:style-name="T2">(92/7) </text:span> ϭⲓϫ ⲛ̅ⲧⲛ̅ϥⲱⲧⲉ ⲉⲃⲟⲗ’ ⲛ̅ⲥⲁⲣⲝ’ ⲛⲓⲙ ϫⲓⲛ ⲣⲱⲙⲉ <text:line-break/><text:span text:style-name="T1"> </text:span><text:span text:style-name="T2">(92/8) </text:span> ϣⲁ ⲧⲃ̅ⲛⲏ §ⲡⲁⲣⲭⲱⲛ ⲇⲉ ⲛ̅ⲛ̅ⲇⲩⲛⲁⲙⲓⲥ ⲛ̅ⲧⲁ‐ <text:line-break/><text:span text:style-name="T1"> </text:span><text:span text:style-name="T2">(92/9) </text:span> ⲣⲉϥ’ⲉⲓⲙⲉ ⲛ̅ⲟⲩϣⲟϫⲛⲉ ⲡⲉϫⲁϥ ⲛ̅ⲛⲱϩⲉ ϫⲉ <text:line-break/><text:span text:style-name="T1"> </text:span><text:span text:style-name="T2">(92/10) </text:span> ⲧⲁⲙⲓⲟ ⲛⲁⲕ’ ⲛ̅ⲛⲟⲩⲕⲓⲃⲱⲧⲟⲥ ⲉⲃⲟⲗ ϩⲛ̅ⲛⲟⲩϣⲉ <text:line-break/><text:span text:style-name="T1"> </text:span><text:span text:style-name="T2">(92/11) </text:span> ⲉⲙⲁϥ’ⲣ̅ ϫⲟⲗⲉⲥ ⲛ̅ⲅϩⲱⲡ’ ⲛ̅ϩⲟⲩⲛ ⲛ̅ϩⲏⲧⲥ̅ ⲛ̅‐ <text:line-break/><text:span text:style-name="T1"> </text:span><text:span text:style-name="T2">(92/12) </text:span> ⲧⲟⲕ’ ⲙⲛ̅ ⲛⲉⲕ’ϣⲏⲣⲉ ⲙⲛ̅ ⲛ̅ⲧⲃⲛⲟⲟⲩⲉ ⲙⲛ̅ ⲛ̅‐ <text:line-break/><text:span text:style-name="T1"> </text:span><text:span text:style-name="T2">(92/13) </text:span> ϩⲁⲗⲁⲧⲉ ⲛ̅ⲧⲡⲉ ϫⲓⲛ’ ⲕⲟⲩⲉⲓ ϣⲁ ⲛⲟϭ ⲛ̅ⲅⲥⲉϩⲱⲥ <text:line-break/><text:span text:style-name="T1"> </text:span><text:span text:style-name="T2">(92/14) </text:span> ⲉⲣⲁⲧⲥ̅ ϩⲓϫⲙ̅ ⲡⲧⲟⲟⲩ ⲛ̅ⲥⲓⲣ’ §ⲁⲥⲉⲓ ⲇⲉ ⲛ̅ϭⲓ ⲱⲣⲉⲁ <text:line-break/><text:span text:style-name="T1"> </text:span><text:span text:style-name="T2">(92/15) </text:span> ϣⲁⲣⲟϥ ⲉⲥⲟⲩⲱϣ ⲉⲧⲉⲗⲟ ⲉϩⲣⲁⲓ̈ ⲉⲧⲕⲓⲃⲱⲧⲟⲥ <text:line-break/><text:span text:style-name="T1"> </text:span><text:span text:style-name="T2">(92/16) </text:span> ⲁⲩⲱ ⲙ̅ⲡⲉϥⲕⲁⲁⲥ ⲁⲥⲛⲓϥⲉ ⲉϩⲟⲩⲛ ⲉϩⲣⲉ ⲧⲕⲓ‐ <text:line-break/><text:span text:style-name="T1"> </text:span><text:span text:style-name="T2">(92/17) </text:span> ⲃⲱⲧⲟⲥ ⲁⲥⲣⲟⲕϩⲥ̅ ⲡⲁⲗⲓⲛ ⲁϥⲧⲁⲙⲓⲟ ⲛ̅ⲧⲕⲓ‐ <text:line-break/><text:span text:style-name="T1"> </text:span><text:span text:style-name="T2">(92/18) </text:span> ⲃⲱⲧⲟⲥ ⲙ̅ⲡⲙⲁϩⲥⲉⲡ’ ⲥⲛⲁⲩ §ⲁⲩⲧⲱⲙⲧ’ ⲉⲣⲟⲥ <text:line-break/><text:span text:style-name="T1"> </text:span><text:span text:style-name="T2">(92/19) </text:span> ⲛ̅ϭⲓ ⲛⲁⲣⲭⲱⲛ ⲉⲩⲟⲩⲱϣ ⲁⲣ̅ⲁⲡⲁⲧⲁ ⲙ̅ⲙⲟⲥ ⲡⲉ‐ <text:line-break/><text:span text:style-name="T1"> </text:span><text:span text:style-name="T2">(92/20) </text:span> ϫⲉ ⲡⲟⲩⲛⲟϭ ⲉⲧⲛ̅ϩⲏⲧⲟⲩ ⲛⲁⲥ ϫⲉ ⲧⲉⲙⲁⲁⲩ <text:line-break/><text:span text:style-name="T1"> </text:span><text:span text:style-name="T2">(92/21) </text:span> ⲉⲩϩⲁ ⲁⲥⲉⲓ ϣⲁⲣⲟⲛ §ⲁⲛⲱⲣⲉⲁ ⲇⲉ ⲕⲟⲧⲥ̅ ⲉⲣⲟ‐ <text:line-break/><text:span text:style-name="T1"> </text:span><text:span text:style-name="T2">(92/22) </text:span> ⲟⲩ ⲡⲉϫⲁⲥ ⲛⲁⲩ ϫⲉ ⲛ̅ⲧⲱⲧⲛ̅ ⲛⲉ ⲛⲁⲣⲭⲱⲛ ⲙ̅‐ <text:line-break/><text:span text:style-name="T1"> </text:span><text:span text:style-name="T2">(92/23) </text:span> ⲡⲕⲁⲕⲉ ⲧⲉⲧⲛ̅ⲥϩⲟⲩⲟⲣⲧ’ ⲟⲩⲧⲉ ⲙ̅ⲡⲉⲧⲛ̅ⲥⲟⲩ‐ <text:line-break/><text:span text:style-name="T1"> </text:span><text:span text:style-name="T2">(92/24) </text:span> ⲱⲛ ⲧⲁⲙⲁⲁⲩ ⲁⲗⲗⲁ ⲛ̅ⲧⲁⲧⲉⲧⲛ̅ⲥⲟⲩⲱⲛ ⲧⲉⲧⲛ̅‐ <text:line-break/><text:span text:style-name="T1"> </text:span><text:span text:style-name="T2">(92/25) </text:span> ϣ̣ⲃⲣ̅ⲉⲓⲛⲉ ⲁⲛⲟⲕ’ ⲟⲩⲉⲃⲟⲗ ⲅⲁⲣ ⲁⲛ’ ϩⲛ̅ ⲧⲏ‐ <text:line-break/><text:span text:style-name="T1"> </text:span><text:span text:style-name="T2">(92/26) </text:span> ⲛ̣ⲉ ⲁ̣[ⲗ]ⲗⲁ ⲛ̅ⲧⲁⲉⲓ ⲉⲃⲟⲗ ϩⲛ̅ ⲛⲁ ⲡⲥⲁ ⲛⲧⲡⲉ <text:line-break/><text:span text:style-name="T1"> </text:span><text:span text:style-name="T2">(92/27) </text:span> §ⲁ̣ⲡ[ⲁⲩ]ⲑⲁⲇⲏⲥ ⲛ̅ⲁⲣⲭⲱⲛ ⲕⲟⲧϥ’ ϩⲛ̅ ⲧⲉϥϭⲟⲙ’ <text:line-break/><text:span text:style-name="T1"> </text:span><text:span text:style-name="T2">(92/28) </text:span> ⲁ̣ⲩⲱ̣ [ⲁ]ⲡⲉϥ’ⲡⲣⲟⲥⲱⲡⲟⲛ ϣⲱⲡⲉ ⲛ̅ⲑⲉ ⲛ̅‐ <text:line-break/><text:span text:style-name="T1"> </text:span><text:span text:style-name="T2">(92/29) </text:span> [ⲟⲩ..]ϩⲧ’ ⲉϥⲕⲏⲙ’ ⲁϥⲧⲟⲗⲙⲁ ⲉϩⲟⲩⲛ’ ⲉⲣⲟⲥ <text:line-break/><text:span text:style-name="T1"> </text:span><text:span text:style-name="T2">(92/30) </text:span> [ⲡⲉϫ]ⲁ̣ϥ ⲛⲁⲥ ϫⲉ ϩⲁⲡⲥ ⲡⲉ ⲉⲧⲣⲉⲣ̅ ⲃⲱⲕ’ ⲛⲁⲛ <text:line-break/><text:span text:style-name="T1"> </text:span><text:span text:style-name="T2">(92/31) </text:span> [ⲛ̅ⲑⲉ] ⲛ̅ⲧⲉⲕⲉⲙⲁⲁⲩ ⲉⲩϩⲁ ⲁⲩϯⲛⲁⲉⲓ ⲅⲁⲣ’ ⲙ̅‐ <text:line-break/><text:span text:style-name="T1"> </text:span><text:span text:style-name="T2">(92/32) </text:span> [.......]’ §[ⲁ]ⲛ̣ⲱⲣⲉⲁ ⲇⲉ ⲕⲟⲧⲥ̅ ϩⲛ̅ ⲧϭⲟⲙ ⲙ̅ⲡ’‐ <text:line-break/><text:span text:style-name="T1"> </text:span><text:span text:style-name="T2">(92/33) </text:span> [....ⲁⲥⲁ]ϣ̣ⲕⲁⲕ’ ⲉⲃⲟⲗ ϩⲛ̅ ⲟⲩⲛⲟϭ ⲛ̅ⲥⲙⲏ <text:line-break/><text:span text:style-name="T1"> </text:span><text:span text:style-name="T2">(92/34) </text:span> [ⲉϩⲣⲁⲓ̈ ⲉ]ⲡ̣ⲡⲉⲧⲟⲩⲁⲁⲃ ⲡⲛⲟⲩⲧⲉ ⲙ̅ⲡⲧⲏⲣϥ’ <text:line-break/><text:span text:style-name="T1"> </text:span><text:span text:style-name="T2">(93/1) </text:span> ϫⲉ ⲉⲣⲓⲃⲟⲏⲑⲉⲓ ⲛⲁⲉⲓ ⲁⲛⲁⲣⲭⲱⲛ ⲛ̅ⲧⲁⲇⲓⲕⲉⲓ‐ <text:line-break/><text:span text:style-name="T1"> </text:span><text:span text:style-name="T2">(93/2) </text:span> ⲁ ⲛ̅ⲅⲛⲁϩⲙⲉⲧ’ ⲁⲛⲟⲩϭⲓϫ ⲛ̅ⲧⲉⲩⲛⲟⲩ §ⲁⲡ〈ⲛⲟϭ ⲛ̅〉ⲁⲅ’‐ <text:line-break/><text:span text:style-name="T1"> </text:span><text:span text:style-name="T2">(93/3) </text:span> ⲅⲉⲗⲟⲥ ⲉⲓ ⲉⲃⲟⲗ ϩⲛ̅ⲛⲙ̅ⲡⲏⲩⲉ ⲉⲡⲉⲥⲏⲧ’ <text:line-break/><text:span text:style-name="T1"> </text:span><text:span text:style-name="T2">(93/4) </text:span> ⲡⲉϫⲁϥ ⲛⲁⲥ ϫⲉ ⲉⲧⲃⲉ ⲟⲩ ⲧⲉⲱϣ ⲉϩⲣⲁⲓ̈ <text:line-break/><text:span text:style-name="T1"> </text:span><text:span text:style-name="T2">(93/5) </text:span> ⲉⲡⲛⲟⲩⲧⲉ ⲉⲧⲃⲉ ⲟⲩ ⲧⲉⲣ̅ⲧⲟⲗⲙⲁ ⲉϩⲣⲁⲓ̈ ⲉⲡ’‐ <text:line-break/><text:span text:style-name="T1"> </text:span><text:span text:style-name="T2">(93/6) </text:span> ⲡⲛ̅ⲁ̅ ⲉⲧⲟⲩⲁⲁⲃ §ⲡⲉϫⲉ ⲛⲱⲣⲉⲁ ϫⲉ ⲛⲧⲕ ⲛⲓⲙ <text:line-break/><text:span text:style-name="T1"> </text:span><text:span text:style-name="T2">(93/7) </text:span> §ⲛⲉ ⲁⲛⲁⲣⲭⲱⲛ ⲛ̅ⲧⲁⲇⲓⲕⲓⲁ ⲥⲉϩⲱⲟⲩ ⲉⲃⲟⲗ <text:line-break/><text:span text:style-name="T1"> </text:span><text:span text:style-name="T2">(93/8) </text:span> ⲙ̅ⲙⲟⲥ ⲡⲉϫⲁϥ ϫⲉ ⲁⲛⲟⲕ’ ⲡⲉ ⲉⲗⲉ̅ⲗ̅ⲏ̅ⲑ̅ <text:line-break/><text:span text:style-name="T1"> </text:span><text:span text:style-name="T2">(93/9) </text:span> ⲧⲙ̅ⲛ̅ⲧⲥⲁⲃⲉ ⲡⲛⲟϭ ⲛ̅ⲁⲅ’ⲅⲉⲗⲟⲥ ⲡⲉⲧⲁϩⲉ‐ <text:line-break/><text:span text:style-name="T1"> </text:span><text:span text:style-name="T2">(93/10) </text:span> ⲣⲁⲧϥ’ ⲙ̅ⲡⲉⲙⲧⲟ ⲉⲃⲟⲗ ⲙ̅ⲡⲡ̅ⲛ̅ⲁ̅ ⲉⲧⲟⲩⲁⲁⲃ’ <text:line-break/><text:span text:style-name="T1"> </text:span><text:span text:style-name="T2">(93/11) </text:span> ⲛ̅ⲧⲁⲩⲧⲛ̅ⲛⲟⲟⲩⲧ’ ⲉⲧⲣⲁϣⲁϫⲉ ⲛⲙ̅ⲙⲉ ⲛ̅ⲧⲁ‐ <text:line-break/><text:span text:style-name="T1"> </text:span><text:span text:style-name="T2">(93/12) </text:span> ⲛⲁϩⲙⲉ ⲉⲧϭⲓϫ’ ⲛ̅ⲛⲓⲁⲛⲟⲙⲟⲥ ⲁⲩⲱ ϯⲛⲁⲧⲁ‐ <text:line-break/><text:span text:style-name="T1"> </text:span><text:span text:style-name="T2">(93/13) </text:span> ⲙⲟ ⲉⲧⲉⲛⲟⲩⲛⲉ §ⲡⲁⲅ’ⲅⲉⲗⲟⲥ ⲇⲉ ⲉⲧⲙ̅ⲙⲁⲩ <text:line-break/><text:span text:style-name="T1"> </text:span><text:span text:style-name="T2">(93/14) </text:span> ϯⲛⲁϣϫⲱ ⲁⲛ ⲛ̅ⲧⲉϥϭⲟⲙ ⲡⲉϥⲉⲓⲛⲉ ⲛ̅ⲑⲉ <text:line-break/><text:soft-page-break/><text:span text:style-name="T1"> </text:span><text:span text:style-name="T2">(93/15) </text:span> ⲙ̅ⲡⲛⲟⲩⲃ ⲉⲧ’ⲥⲟⲧⲡ’ ⲁⲩⲱ ⲧⲉϥϩⲃ̅ⲥⲱ ⲛ̅ⲑⲉ <text:line-break/><text:span text:style-name="T1"> </text:span><text:span text:style-name="T2">(93/16) </text:span> ⲙ̅ⲡⲭⲓⲱⲛ ⲧⲁⲧⲁⲡⲣⲟ ⲅⲁⲣ ⲛⲁϣϣⲟⲡϥ’ ⲁⲛ <text:line-break/><text:span text:style-name="T1"> </text:span><text:span text:style-name="T2">(93/17) </text:span> ⲉⲧⲣⲁϫⲱ ⲛ̅ⲧⲉϥϭⲟⲙ ⲙⲛ̅ ⲡⲉⲓⲛⲉ ⲙ̅ⲡⲉϥϩⲟ <text:line-break/><text:span text:style-name="T1"> </text:span><text:span text:style-name="T2">(93/18) </text:span> §ⲡⲉϫⲁϥ ⲛⲁⲉⲓ ⲛ̅ϭⲓ ⲉ̅ⲗ̅ⲉ̅ⲗ̅ⲏ̅ⲑ̅ ⲡⲛⲟϭ ⲛ̅ⲁⲅ’‐ <text:line-break/><text:span text:style-name="T1"> </text:span><text:span text:style-name="T2">(93/19) </text:span> ⲅⲉⲗⲟⲥ ⲁⲛⲟⲕ’ ⲡⲉϫⲁϥ’ ⲧⲉ ⲧ’ⲙⲛⲧⲣⲙⲛ̅ϩⲏⲧ’ <text:line-break/><text:span text:style-name="T1"> </text:span><text:span text:style-name="T2">(93/20) </text:span> ⲁⲛⲟⲕ’ ⲟⲩⲉⲃⲟⲗ ϩⲙ̅ ⲡⲉϥⲧⲟⲟⲩ ⲙ̅ⲫⲱⲥⲧⲏⲣ’ <text:line-break/><text:span text:style-name="T1"> </text:span><text:span text:style-name="T2">(93/21) </text:span> ⲛⲁⲉⲓ ⲉⲧⲁϩⲉⲣⲁⲧⲟⲩ ⲙ̅ⲡⲙ̅ⲧⲟ ⲉⲃⲟⲗ ⲙ̅ⲡⲛⲟϭ <text:line-break/><text:span text:style-name="T1"> </text:span><text:span text:style-name="T2">(93/22) </text:span> ⲙ̅ⲡⲛ̅ⲁ̅ ⲛ̅ⲁϩⲟⲣⲁⲧⲟⲛ ⲉⲣⲉⲙⲉⲉⲩⲉ ϫⲉ ⲟⲩⲛ <text:line-break/><text:span text:style-name="T1"> </text:span><text:span text:style-name="T2">(93/23) </text:span> ϭⲟⲙ’ ⲛ̅ⲛⲉⲉⲓⲁⲣⲭⲱⲛ ⲉϩⲟⲩⲛ ⲉⲣⲟ ⲙⲛ̅ ⲗⲁⲁⲩ <text:line-break/><text:span text:style-name="T1"> </text:span><text:span text:style-name="T2">(93/24) </text:span> ⲛ̅ϩⲏⲧⲟⲩ ⲛⲁϣϭⲙ̅ ϭⲟⲙ ⲉϩⲟⲩⲛ ⲉⲧⲛⲟⲩ‐ <text:line-break/><text:span text:style-name="T1"> </text:span><text:span text:style-name="T2">(93/25) </text:span> ⲛⲉ ⲛ̅ⲧⲙⲉ ⲉⲧⲃⲏⲧⲥ ⲅⲁⲣ † ⲁϥⲟⲩⲱⲛϩ ⲉⲃⲟⲗ <text:line-break/><text:span text:style-name="T1"> </text:span><text:span text:style-name="T2">(93/26) </text:span> ϩⲛ̅ ⲛ̅ϩⲁⲉⲉⲩ ⲛ̅ⲕⲁⲓⲣⲟⲥ ⲁⲩⲱ ⲥⲉⲛⲁⲣ̅ ⲣ̣̅ⲣⲟ ⲉ‐ <text:line-break/><text:span text:style-name="T1"> </text:span><text:span text:style-name="T2">(93/27) </text:span> ϫⲛ̅ ⲛⲉⲉⲓⲉⲝⲟⲩⲥⲓⲁ ⲁⲩⲱ ⲛⲉⲉⲓⲉⲝⲟⲩⲥⲓⲁ <text:line-break/><text:span text:style-name="T1"> </text:span><text:span text:style-name="T2">(93/28) </text:span> ⲛⲁϣϫⲁϩⲙⲉ ⲁⲛ ⲙⲛ̅ ⲧⲅⲉⲛⲉⲁ ⲉⲧⲙ̅ⲙⲁⲩ <text:line-break/><text:span text:style-name="T1"> </text:span><text:span text:style-name="T2">(93/29) </text:span> ⲧⲉⲧⲙ̅ⲙⲟⲛⲏ ⲅⲁⲣ’ ⲉⲥϣⲟⲟⲡ’ ϩⲛ̅ ⲧⲙ̅ⲛ̅ⲧⲁ̣ⲧ’‐ <text:line-break/><text:span text:style-name="T1"> </text:span><text:span text:style-name="T2">(93/30) </text:span> ⲧⲁⲕⲟ ⲡⲙⲁ ⲉⲧⲉ ⲡⲡⲛ̅ⲁ̅ ⲙ̅ⲡⲁⲣⲑⲉⲛⲓⲕⲟⲛ <text:line-break/><text:span text:style-name="T1"> </text:span><text:span text:style-name="T2">(93/31) </text:span> ⲙ̅ⲙⲁⲩ ⲡⲉⲧϩⲓϫⲛ̅ ⲛ̅ⲉⲝⲟⲩⲥⲓⲁ ⲙ̅ⲡⲭⲁⲟⲥ <text:line-break/><text:span text:style-name="T1"> </text:span><text:span text:style-name="T2">(93/32) </text:span> ⲙⲛ̅ ⲡⲟⲩⲕⲟⲥⲙⲟⲥ §ⲁⲛⲟⲕ’ ϩⲱ̣ ⲡ̣ⲉ̣ϫⲁⲉⲓ <text:line-break/><text:span text:style-name="T1"> </text:span><text:span text:style-name="T2">(93/33) </text:span> ϫⲉ ⲡϫⲟⲉⲓⲥ ⲙⲁⲧⲥⲉⲃⲉⲉⲓ ⲁⲧϭ̣[ⲟⲙ ⲛ̅ⲛ]ⲉ‐ <text:line-break/><text:span text:style-name="T1"> </text:span><text:span text:style-name="T2">(93/34) </text:span> ⲉⲓⲉⲝⲟⲩⲥⲓⲁ ϫⲉ ⲛ̅ⲧⲁⲩϣⲱⲡⲉ̣ [ⲛ̅ⲁϣ ⲛ̅ϩⲉ] <text:line-break/><text:span text:style-name="T1"> </text:span><text:span text:style-name="T2">(93/35) </text:span> ⲁⲩⲱ ⲉⲃⲟⲗ ϩⲛ̅ ⲁϣ ⲛ̅ϩⲩⲡⲟⲥⲧ[ⲁⲥⲓⲥ ⲁⲩⲱ ⲉ]‐ <text:line-break/><text:span text:style-name="T1"> </text:span><text:span text:style-name="T2">(94/1) </text:span> ⲃⲟⲗ ϩⲛ̅ ⲁϣ ⲛ̅ϩⲩⲗⲏ ⲁⲩ̣ⲱ ⲛⲓⲙ ⲡⲉⲛⲧⲁϥⲧⲁ‐ <text:line-break/><text:span text:style-name="T1"> </text:span><text:span text:style-name="T2">(94/2) </text:span> ⲙⲓⲟⲟⲩ ⲙⲛ̅ ⲧⲟⲩⲇⲩⲛⲁⲙⲓⲥ ⲁⲩⲱ ⲡⲉϫⲁϥ ⲛⲁⲉⲓ <text:line-break/><text:span text:style-name="T1"> </text:span><text:span text:style-name="T2">(94/3) </text:span> ⲛ̅ϭⲓ ⲡⲛⲟϭ ⲛ̅ⲁⲅ’ⲅⲉⲗⲟⲥ ⲉⲗⲉⲗⲏⲑ ⲧⲙⲛⲧⲣⲙ̅‐ <text:line-break/><text:span text:style-name="T1"> </text:span><text:span text:style-name="T2">(94/4) </text:span> ⲛ̅ϩⲏⲧ’ ϩⲣⲁⲓ̈ ϩⲛ̅ⲛⲁⲓⲱⲛ ⲉⲙⲛ̅ⲧⲁⲩ ⲁⲣⲏϫϥ̅ <text:line-break/><text:span text:style-name="T1"> </text:span><text:span text:style-name="T2">(94/5) </text:span> ⲉⲥϣⲟⲟⲡ’ ⲛ̅ϭⲓ ⲧⲙ̅ⲛ̅ⲧⲁⲧⲧⲁⲕⲟ ⲧⲥⲟⲫⲓⲁ ⲧⲁⲉⲓ <text:line-break/><text:span text:style-name="T1"> </text:span><text:span text:style-name="T2">(94/6) </text:span> ⲉⲧⲟⲩⲙⲟⲩⲧⲉ ⲉⲣⲟⲥ ϫⲉ ⲧⲡⲓⲥⲧⲓⲥ ⲁⲥⲟⲩⲱϣ’ <text:line-break/><text:span text:style-name="T1"> </text:span><text:span text:style-name="T2">(94/7) </text:span> ⲉⲧⲉⲛⲉ ⲟⲩϩⲱⲃ’ ⲟⲩⲁⲁⲥ ⲁϫⲛ̅ ⲡⲉⲥϩⲱⲧⲣ̅ ⲁⲩ‐ <text:line-break/><text:span text:style-name="T1"> </text:span><text:span text:style-name="T2">(94/8) </text:span> ⲱ ⲡⲉⲥⲉⲣⲅⲟⲛ ⲁϥϣⲱⲡⲉ ⲛ̅ⲛⲓⲛⲉ ⲙ̅ⲡⲉ ⲟⲩⲛ̅ <text:line-break/><text:span text:style-name="T1"> </text:span><text:span text:style-name="T2">(94/9) </text:span> ⲟⲩⲕⲁⲧⲁⲡⲉⲧⲁⲥⲙⲁ ϣⲟⲟⲡ’ ⲟⲩⲧⲉ ⲛⲁ ⲡⲥⲁ ⲛ‐ <text:line-break/><text:span text:style-name="T1"> </text:span><text:span text:style-name="T2">(94/10) </text:span> ⲧⲡⲉ ⲙⲛ̅ ⲛⲁⲓⲱⲛ ⲉⲧⲙ̅ⲡⲥⲁ ⲙⲡⲓⲧⲛ̅ ⲁⲩⲱ ⲁⲩ‐ <text:line-break/><text:span text:style-name="T1"> </text:span><text:span text:style-name="T2">(94/11) </text:span> ϩⲁⲓ̈ⲃⲉⲥ ϣⲱⲡⲉ ϩⲁ ⲡⲉⲥⲏⲧ ⲙ̅ⲡⲕⲁⲧⲁⲡⲉⲧⲁⲥ‐ <text:line-break/><text:span text:style-name="T1"> </text:span><text:span text:style-name="T2">(94/12) </text:span> ⲙⲁ ⲁⲩⲱ ⲁⲑⲁⲉⲓⲃⲉⲥ ⲉⲧⲙ̅ⲙⲁⲩ ϣⲱⲡⲉ ⲛ̅ϩⲩ‐ <text:line-break/><text:span text:style-name="T1"> </text:span><text:span text:style-name="T2">(94/13) </text:span> ⲗⲏ ⲁⲩⲱ ⲑⲁⲉⲓⲃⲉ ⲉⲧⲙ̅ⲙⲁⲩ ⲁⲩⲛⲟϫⲥ̅ ⲁⲩⲥⲁ <text:line-break/><text:span text:style-name="T1"> </text:span><text:span text:style-name="T2">(94/14) </text:span> ⲛ̅ⲟⲩⲙⲉⲣⲟⲥ ⲁⲩⲱ ⲡⲉⲥⲙⲟⲩⲟⲩⲅ’ ⲁϥϣⲱⲡⲉ <text:line-break/><text:span text:style-name="T1"> </text:span><text:span text:style-name="T2">(94/15) </text:span> ⲛ̅ⲛⲟⲩⲉⲣⲅⲟⲛ ϩⲛ̅ ⲑⲩⲗⲏ ⲛ̅ⲑⲉ ⲛ̅ⲛⲟⲩϩⲟⲩϩⲉ <text:line-break/><text:span text:style-name="T1"> </text:span><text:span text:style-name="T2">(94/16) </text:span> ⲁϥϫⲓ ⲧⲩⲡⲟⲥ ⲉⲃⲟⲗ ϩⲛ̅ ⲑⲁⲉⲓⲃⲉⲥ ⲁϥϣⲱⲡⲉ <text:line-break/><text:span text:style-name="T1"> </text:span><text:span text:style-name="T2">(94/17) </text:span> ⲛ̅ⲟⲩⲑⲏⲣⲓⲟⲛ ⲛ̅ⲁⲩⲑⲁⲇⲏⲥ ⲛ̅ⲛⲓⲛⲉ ⲙ̅ⲙⲟⲩⲉⲓ <text:line-break/><text:span text:style-name="T1"> </text:span><text:span text:style-name="T2">(94/18) </text:span> ⲟⲩϩⲟⲩⲧ’ⲥϩⲓⲙⲉ ⲡⲉ ⲛ̅ⲑⲉ ⲛ̅ⲧⲁϩⲓϣⲣ̅ⲡ̅ⲛ̅ϫⲟⲟⲥ <text:line-break/><text:span text:style-name="T1"> </text:span><text:span text:style-name="T2">(94/19) </text:span> ϫⲉ ⲛ̅ⲧⲁϥⲉⲓ ⲉⲃⲟⲗ ϩⲛ̅ ⲑⲩⲗⲏ §ⲁϥⲟⲩⲉⲛ ⲁⲛⲉϥ’‐ <text:line-break/><text:span text:style-name="T1"> </text:span><text:span text:style-name="T2">(94/20) </text:span> ⲃⲁⲗ ⲁϥⲛⲁⲩ ⲁⲩⲛⲟϭ ⲛ̅ϩⲩⲗⲏ ⲉⲙⲛⲧⲉⲥ ⲁⲣⲏϫϥ̅ <text:line-break/><text:span text:style-name="T1"> </text:span><text:span text:style-name="T2">(94/21) </text:span> ⲁⲩⲱ ⲁϥⲣ̅ ϫⲁⲥⲓϩⲏⲧ ⲉϥϫⲱ ⲙ̅ⲙⲟⲥ ϫⲉ ⲁⲛⲟⲕ’ <text:line-break/><text:span text:style-name="T1"> </text:span><text:span text:style-name="T2">(94/22) </text:span> ⲡⲉ ⲡⲛⲟⲩⲧⲉ ⲁⲩⲱ ⲙⲛ̅ ϭⲉ ⲁϫⲛ̅ⲧ §ⲛ̅ⲧⲁⲣⲉϥ’ <text:line-break/><text:span text:style-name="T1"> </text:span><text:span text:style-name="T2">(94/23) </text:span> ϫⲉ ⲡⲁⲉⲓ ⲁϥⲣ̅ ⲛⲟⲃⲉ ⲉϩⲣⲁⲓ̈ ⲉⲡⲧⲏⲣϥ’ ⲟⲩⲥⲙⲏ <text:line-break/><text:span text:style-name="T1"> </text:span><text:span text:style-name="T2">(94/24) </text:span> ⲇⲉ ⲁⲥⲉⲓ ⲉⲃⲟⲗ ⲙ̅ⲡⲥⲁ ⲛϩⲣⲉ ⲛ̅ⲧⲁⲩⲑⲉⲛⲧⲉⲓⲁ <text:line-break/><text:span text:style-name="T1"> </text:span><text:span text:style-name="T2">(94/25) </text:span> ⲉⲥϫⲱ ⲙ̅ⲙⲟⲥ ϫⲉ ⲕⲣ̅ⲡⲗⲁⲛⲁⲥⲑⲉ ⲥⲁⲙⲁ‐ <text:line-break/><text:span text:style-name="T1"> </text:span><text:span text:style-name="T2">(94/26) </text:span> ⲏⲗ ⲉⲧⲉ ⲡⲁⲉⲓ ⲡⲉ ⲡⲛⲟⲩⲧⲉ ⲛ̅ⲃ̅ⲃⲗ̅ⲗⲉ §ⲁⲩ‐ <text:line-break/><text:soft-page-break/><text:span text:style-name="T1"> </text:span><text:span text:style-name="T2">(94/27) </text:span> ⲱ ⲡⲉϫⲁϥ ϫⲉ ⲉϣϫⲉ ⲟⲩⲛ̅ ϭⲉ ϣⲟⲟⲡ ϩⲓ ⲧⲁ‐ <text:line-break/><text:span text:style-name="T1"> </text:span><text:span text:style-name="T2">(94/28) </text:span> ⲉϩⲏ ⲙⲁⲣⲉϥ’ⲟⲩⲱⲛϩ ⲉⲃⲟⲗ ⲛⲁⲉⲓ ⲁⲩⲱ ⲛ̅‐ <text:line-break/><text:span text:style-name="T1"> </text:span><text:span text:style-name="T2">(94/29) </text:span> ⲧⲉⲩⲛⲟⲩ ⲁⲧⲥⲟⲫⲓⲁ ⲥⲱⲧ’ ⲉⲃⲟⲗ ⲙ̅ⲡⲉⲥⲧⲏ‐ <text:line-break/><text:span text:style-name="T1"> </text:span><text:span text:style-name="T2">(94/30) </text:span> ⲏⲃⲉ ⲁⲥⲓⲛⲉ ⲉϩⲟⲩⲛ ⲙ̅ⲡⲟⲩⲟⲉⲓⲛ ⲉϩⲟⲩⲛ <text:line-break/><text:span text:style-name="T1"> </text:span><text:span text:style-name="T2">(94/31) </text:span> ⲉⲑⲩⲗⲏ ⲁⲩⲱ ⲁⲥⲡⲱⲧ’ ⲛ̅ⲥⲱϥ’ ϣⲁ ⲡⲉⲥⲏⲧ’ <text:line-break/><text:span text:style-name="T1"> </text:span><text:span text:style-name="T2">(94/32) </text:span> ⲁⲙⲙⲉⲣⲟⲥ ⲙ̅ⲡⲭⲁⲟⲥ ⲁⲩⲱ ⲁⲥⲣ̅ⲁⲛⲁⲭⲱⲣⲉⲓ <text:line-break/><text:span text:style-name="T1"> </text:span><text:span text:style-name="T2">(94/33) </text:span> ⲉϩⲣ̣[ⲁⲓ̈ ⲉⲡⲉ]ⲥⲟⲩⲟⲉⲓⲛ’ ⲡⲁⲗⲓⲛ ⲁⲡⲕⲁⲕⲉ <text:line-break/><text:span text:style-name="T1"> </text:span><text:span text:style-name="T2">(94/34) </text:span> [......]ⲛ̅ⲑⲩⲗⲏ §ⲡⲓⲁⲣⲭⲱⲛ ⲉϥⲟ ⲛ̅ϩⲟⲟⲩⲧ’‐ <text:line-break/><text:span text:style-name="T1"> </text:span><text:span text:style-name="T2">(94/35) </text:span> [ⲥϩⲓⲙⲉ ⲁϥ]ⲧ̣ⲁⲙⲓⲟ ⲛⲁϥ’ ⲛ̅ⲟⲩⲛⲟϭ ⲛ̅ⲁⲓⲱⲛ <text:line-break/><text:span text:style-name="T1"> </text:span><text:span text:style-name="T2">(95/1) </text:span> ⲟⲩⲙⲉⲅⲉⲑⲟⲥ ⲉⲙ̣[ⲛ̅ⲧ]ⲉ̣ϥ̣ ⲁⲣⲏϫϥ̅ ⲁϥⲙⲉⲉⲩ̣‐ <text:line-break/><text:span text:style-name="T1"> </text:span><text:span text:style-name="T2">(95/2) </text:span> ⲉ ⲇⲉ ⲁⲧⲁⲙⲓⲟ ⲛⲁϥ ⲛ̅ϩⲛ̅ϣⲏⲣⲉ ⲁϥⲧⲁⲙⲓⲟ <text:line-break/><text:span text:style-name="T1"> </text:span><text:span text:style-name="T2">(95/3) </text:span> ⲛⲁϥ ⲛ̅ⲥⲁϣϥ̅ ⲛ̅ϣⲏⲣⲉ ⲛ̅ϩⲟⲩⲧⲥϩⲓⲙⲉ ⲙⲛ̅ <text:line-break/><text:span text:style-name="T1"> </text:span><text:span text:style-name="T2">(95/4) </text:span> ⲡⲟⲩⲉⲓⲱⲧ’ §ⲁⲩⲱ ⲡⲉϫⲁϥ ⲛ̅ⲛⲉϥ’ϣⲏⲣⲉ ϫⲉ <text:line-break/><text:span text:style-name="T1"> </text:span><text:span text:style-name="T2">(95/5) </text:span> ⲁⲛⲟⲕ’ ⲡⲉ ⲡⲛⲟⲩⲧⲉ ⲙ̅ⲡⲧⲏⲣϥ̅ §ⲁⲩⲱ ⲍⲱⲏ’ <text:line-break/><text:span text:style-name="T1"> </text:span><text:span text:style-name="T2">(95/6) </text:span> ⲧϣⲉⲉⲣⲉ ⲛ̅ⲧⲡⲓⲥⲧⲓⲥ ⲧⲥⲟⲫⲓⲁ ⲁⲥⲁϣⲕⲁⲕ’ ⲉ‐ <text:line-break/><text:span text:style-name="T1"> </text:span><text:span text:style-name="T2">(95/7) </text:span> ⲃⲟⲗ ⲡⲉϫⲁⲥ ⲛⲁϥ’ ϫⲉ ⲕⲣ̅ⲡⲗⲁⲛⲁ ⲥⲁⲕⲗⲁ ⲉ‐ <text:line-break/><text:span text:style-name="T1"> </text:span><text:span text:style-name="T2">(95/8) </text:span> ⲧⲉ ⲡⲉϥ’ⲟⲩϩⲱⲙ ⲡⲉ ⲓ̈ⲁⲗⲧⲁⲃⲁⲱⲑ’ ⲁⲥⲛⲓ‐ <text:line-break/><text:span text:style-name="T1"> </text:span><text:span text:style-name="T2">(95/9) </text:span> ϥⲉ ⲉϩⲟⲩⲛ ϩⲙ̅ ⲡⲉϥϩⲟ ⲁⲩⲱ ⲁⲡⲉⲥⲛⲓϥⲉ ϣⲱ‐ <text:line-break/><text:span text:style-name="T1"> </text:span><text:span text:style-name="T2">(95/10) </text:span> ⲡⲉ ⲛⲁⲥ ⲛ̅ⲟⲩⲁⲅⲅⲉⲗⲟⲥ ⲉϥⲟ ⲛ̅ⲕⲱϩⲧ’ ⲁⲩⲱ <text:line-break/><text:span text:style-name="T1"> </text:span><text:span text:style-name="T2">(95/11) </text:span> ⲁⲡⲁⲅ’ⲅⲉⲗⲟⲥ ⲉⲧⲙ̅ⲙⲁⲩ ⲙⲟⲩⲣ’ ⲛ̅ⲓⲁⲗⲇⲁⲃⲁ‐ <text:line-break/><text:span text:style-name="T1"> </text:span><text:span text:style-name="T2">(95/12) </text:span> ⲱⲑ’ ⲁϥⲛⲟϫϥ̅ ⲉⲡⲓⲧⲛ̅ ⲉⲡⲧⲁⲣⲧⲁⲣⲟⲛ ⲙ̅ⲡ’‐ <text:line-break/><text:span text:style-name="T1"> </text:span><text:span text:style-name="T2">(95/13) </text:span> ⲥⲁ ⲙⲓⲧⲛ̅ ⲙ̅ⲡⲛⲟⲩⲛ §ⲡⲉϥϣⲏⲣⲉ ⲇⲉ ⲥⲁ‐ <text:line-break/><text:span text:style-name="T1"> </text:span><text:span text:style-name="T2">(95/14) </text:span> ⲃⲁⲱⲑ’ ⲛ̅ⲧⲁⲣⲉϥⲛⲁⲩ ⲁⲧⲇⲩⲛⲁⲙⲓⲥ ⲙ̅ⲡⲁⲅ’‐ <text:line-break/><text:span text:style-name="T1"> </text:span><text:span text:style-name="T2">(95/15) </text:span> ⲅⲉⲗⲟⲥ ⲉⲧⲙ̅ⲙⲁⲩ ⲁϥⲙⲉⲧⲁⲛⲟⲉⲓ ⲁϥⲣ̅ⲕⲁ‐ <text:line-break/><text:span text:style-name="T1"> </text:span><text:span text:style-name="T2">(95/16) </text:span> ⲧⲁⲅⲉⲓⲛⲱⲥⲕⲉ ⲙ̅ⲡⲉϥⲉⲓⲱⲧ’ ⲙⲛ̅ ⲧⲉϥⲙⲁⲁⲩ <text:line-break/><text:span text:style-name="T1"> </text:span><text:span text:style-name="T2">(95/17) </text:span> ⲑⲩⲗⲏ §ⲁϥⲥⲓⲭⲁⲛⲉ ⲉⲣⲟⲥ ⲁϥⲣ̅ϩⲩⲙⲛⲉⲓ ⲇⲉ <text:line-break/><text:span text:style-name="T1"> </text:span><text:span text:style-name="T2">(95/18) </text:span> ⲉϩⲣⲁⲓ̈ ⲉⲧⲥⲟⲫⲓⲁ ⲁⲩⲱ ⲧⲉⲥϣⲉⲉⲣⲉ ⲛ̅ⲍⲱⲏ <text:line-break/><text:span text:style-name="T1"> </text:span><text:span text:style-name="T2">(95/19) </text:span> ⲁⲩⲱ ⲁⲧⲥⲟⲫⲓⲁ ⲙⲛ̅ ⲍⲱⲏ ⲧⲟⲣⲡϥ’ ⲉϩⲣⲁⲓ̈ ⲁⲩ‐ <text:line-break/><text:span text:style-name="T1"> </text:span><text:span text:style-name="T2">(95/20) </text:span> ⲕⲁⲑⲓⲥⲧⲁ ⲙ̅ⲙⲟϥ’ ⲉϫⲛ̅ ⲧⲙⲉϩⲥⲁϣϥⲉ ⲙ̅ⲡⲉ <text:line-break/><text:span text:style-name="T1"> </text:span><text:span text:style-name="T2">(95/21) </text:span> ⲡⲥⲁ ⲙⲡⲓⲧⲛ̅ ⲙ̅ⲡⲕⲁⲧⲁⲡⲉⲧⲁⲥⲙⲁ ⲟⲩⲧⲉ <text:line-break/><text:span text:style-name="T1"> </text:span><text:span text:style-name="T2">(95/22) </text:span> ⲡⲥⲁ ⲛⲧⲡⲉ ⲙⲛ̅ ⲡⲥⲁ ⲙⲡⲓⲧⲛ̅ ⲁⲩⲱ ⲁⲩⲙⲟⲩ‐ <text:line-break/><text:span text:style-name="T1"> </text:span><text:span text:style-name="T2">(95/23) </text:span> ⲧⲉ ⲉⲣⲟϥ’ ϫⲉ ⲡⲛⲟⲩⲧⲉ ⲛ̅ⲛ̅ⲇⲩⲛⲁⲙⲓⲥ ⲥⲁ‐ <text:line-break/><text:span text:style-name="T1"> </text:span><text:span text:style-name="T2">(95/24) </text:span> ⲃⲁⲱⲑ ϫⲉ ⲉϥⲙ̅ⲡⲥⲁ ⲛ’ⲧⲡⲉ ⲛ̅ⲛ̅ⲇⲩⲛⲁⲙⲓⲥ <text:line-break/><text:span text:style-name="T1"> </text:span><text:span text:style-name="T2">(95/25) </text:span> ⲙ̅ⲡⲭⲁⲟⲥ ϫⲉ ⲁⲧⲥⲟⲫⲓⲁ ⲕⲁⲑⲓⲥⲧⲁ ⲙ̅ⲙⲟϥ <text:line-break/><text:span text:style-name="T1"> </text:span><text:span text:style-name="T2">(95/26) </text:span> §ϩⲟⲧⲓ ⲇⲉ ⲁⲛⲁⲉⲓ ϣⲱⲡⲉ ⲁϥⲧⲁⲙⲓⲟ ⲛⲁϥ’ <text:line-break/><text:span text:style-name="T1"> </text:span><text:span text:style-name="T2">(95/27) </text:span> ⲛ̅ⲟⲩⲛⲟϭ ⲛ̅ϩⲁⲣⲙⲁ ⲛ̅ⲭⲉⲣⲟⲩⲃⲓⲛ ⲉϥⲟ ⲛ̅‐ <text:line-break/><text:span text:style-name="T1"> </text:span><text:span text:style-name="T2">(95/28) </text:span> ϥⲧⲟⲟⲩ ⲙ̅ⲡⲣⲟⲥⲱⲡⲟⲛ ⲙⲛ̅ ϩⲛ̅ⲁⲅⲅⲉⲗⲟⲥ <text:line-break/><text:span text:style-name="T1"> </text:span><text:span text:style-name="T2">(95/29) </text:span> ⲉⲛⲁϣⲱⲟⲩ ⲉⲙⲛ̅ⲧⲟⲩ ⲏⲡⲉ ⲉⲧⲣⲟⲩⲣ̅ϩⲩ‐ <text:line-break/><text:span text:style-name="T1"> </text:span><text:span text:style-name="T2">(95/30) </text:span> ⲡⲏⲣⲉⲧⲉⲓ’ ⲁⲩⲱ ϩⲙ̅ⲯⲁⲗⲧⲏⲣⲓⲟⲛ ⲙⲛ̅ ϩⲛ̅‐ <text:line-break/><text:span text:style-name="T1"> </text:span><text:span text:style-name="T2">(95/31) </text:span> ⲕⲓⲑⲁⲣⲁ §ⲁⲩⲱ ⲁⲧⲥⲟⲫⲓⲁ ϥⲓ ⲧⲉⲥϣⲉⲉⲣⲉ ⲛ̅‐ <text:line-break/><text:span text:style-name="T1"> </text:span><text:span text:style-name="T2">(95/32) </text:span> ⲍⲱⲏ ⲁⲥⲧⲣⲉⲥϩⲙⲟⲟⲥ ϩⲓ ⲟⲩⲛⲁⲙ’ ⲙ̅ⲙⲟϥ’ <text:line-break/><text:span text:style-name="T1"> </text:span><text:span text:style-name="T2">(95/33) </text:span> ⲉⲧⲣⲉⲥⲧⲁⲙⲟϥ’ ⲁⲛⲉⲧ’ϣⲟⲟⲡ [ϩ̣]ⲛ̣̅ ⲧⲙⲁϩ‐ <text:line-break/><text:span text:style-name="T1"> </text:span><text:span text:style-name="T2">(95/34) </text:span> ϣⲙⲟⲩⲛⲉ ⲁⲩⲱ ⲡⲓⲁⲅⲅⲉⲗⲟ[ⲥ ⲛ̅ⲧⲉ ⲧⲟ]ⲣ̣‐ <text:line-break/><text:span text:style-name="T1"> </text:span><text:span text:style-name="T2">(95/35) </text:span> ⲅⲏ ⲁⲥⲕⲁⲁϥ ϩⲓ ϩⲃⲟⲩⲣ ⲙ̅ⲙⲟϥ [ϫⲓⲙ ⲫⲟ]‐ <text:line-break/><text:span text:style-name="T1"> </text:span><text:span text:style-name="T2">(95/36) </text:span> ⲟⲩ ⲉⲧⲙ̅ⲙⲁⲩ ⲁⲩⲙⲟⲩⲧⲉ ⲁⲧ̣[ⲉϥⲟⲩⲛⲁⲙ] <text:line-break/><text:span text:style-name="T1"> </text:span><text:span text:style-name="T2">(96/1) </text:span> ϫⲉ ⲍⲱⲏ ⲁⲩⲱ ⲧϩ̣ⲃⲟ̣[ⲩ]ⲣ̣ ⲁⲥϣⲱⲡⲉ ⲛ̅ⲧⲩⲡⲟⲥ <text:line-break/><text:span text:style-name="T1"> </text:span><text:span text:style-name="T2">(96/2) </text:span> ⲛ̅ⲧⲁⲇⲓⲕⲓⲁ ⲛ̅ⲧⲙ̅ⲛ̅ⲧⲁⲩⲑⲉⲛⲧⲏⲥ ⲙ̅ⲡⲥⲁ ⲛ’‐ <text:line-break/><text:soft-page-break/><text:span text:style-name="T1"> </text:span><text:span text:style-name="T2">(96/3) </text:span> ⲧⲡⲉ ⲛ̅ⲧⲁⲩϣⲱⲡⲉ ϩⲁ ⲧⲟⲩⲉϩⲏ §ⲛ̅ⲧⲁⲣⲉ ⲓ̈ⲁⲗ’‐ <text:line-break/><text:span text:style-name="T1"> </text:span><text:span text:style-name="T2">(96/4) </text:span> ⲇⲁⲃⲁⲱⲑ ⲇⲉ’ ⲛⲁⲩ ⲉⲣⲟϥ ⲉϥϣⲟⲟⲡ’ ϩⲙ̅ ⲡⲉⲓ̈‐ <text:line-break/><text:span text:style-name="T1"> </text:span><text:span text:style-name="T2">(96/5) </text:span> ⲛⲟϭ ⲛ̅ⲉⲟⲟⲩ ⲙⲛ̅ ⲡⲉⲉⲓϫⲓⲥⲉ ⲁϥⲕⲱϩ ⲉⲣⲟϥ’ <text:line-break/><text:span text:style-name="T1"> </text:span><text:span text:style-name="T2">(96/6) </text:span> ⲁⲩⲱ ⲁⲡⲕⲱϩ ϣⲱⲡⲉ ⲛ̅ⲟⲩⲉⲣⲅⲟⲛ ⲉϥⲟ ⲛ̅ϩⲟ‐ <text:line-break/><text:span text:style-name="T1"> </text:span><text:span text:style-name="T2">(96/7) </text:span> ⲟⲩⲧⲥϩⲓⲙⲉ ⲁⲩⲱ ⲁⲡⲁⲉⲓ ϣⲱⲡⲉ ⲛ̅ⲁⲣⲭⲏ ⲙ̅‐ <text:line-break/><text:span text:style-name="T1"> </text:span><text:span text:style-name="T2">(96/8) </text:span> ⲡⲕⲱϩ ⲁⲩⲱ ⲁⲡⲕⲱϩ ϫⲡⲉ ⲡⲙⲟⲩ ⲁⲡⲙⲟⲩ <text:line-break/><text:span text:style-name="T1"> </text:span><text:span text:style-name="T2">(96/9) </text:span> ⲇⲉ ϫⲡⲟ ⲛ̅ⲛⲉϥϣⲏⲣⲉ ⲁϥⲕⲁⲑⲓⲥⲧⲁ ⲙ̅ⲡⲟⲩⲁ <text:line-break/><text:span text:style-name="T1"> </text:span><text:span text:style-name="T2">(96/10) </text:span> ⲡⲟⲩⲁ ⲙ̅ⲙⲟⲟⲩ ⲉϫⲛ̅ ⲧⲉϥⲡⲉ ⲁⲛⲡⲏⲩⲉ ⲧⲏⲣⲟⲩ <text:line-break/><text:span text:style-name="T1"> </text:span><text:span text:style-name="T2">(96/11) </text:span> ⲙ̅ⲡⲭⲁⲟⲥ ⲙⲟⲩϩ ⲛ̅ⲛⲟⲩⲏⲡⲉ §ⲛⲁⲉⲓ ⲇⲉ ⲧⲏⲣⲟⲩ <text:line-break/><text:span text:style-name="T1"> </text:span><text:span text:style-name="T2">(96/12) </text:span> ⲛ̅ⲧⲁⲩϣⲱⲡⲉ ϩⲙ̅ ⲡⲟⲩⲱϣ ⲙ̅ⲡⲉⲓⲱⲧ’ ⲙ̅ⲡⲧⲏⲣϥ’ <text:line-break/><text:span text:style-name="T1"> </text:span><text:span text:style-name="T2">(96/13) </text:span> ⲕⲁⲧⲁ ⲡⲧⲩⲡⲟⲥ ⲛ̅ⲛⲁ ⲡⲥⲁ ⲛ’ⲧⲡⲉ’ ⲧⲏⲣⲟⲩ ϣⲓ‐ <text:line-break/><text:span text:style-name="T1"> </text:span><text:span text:style-name="T2">(96/14) </text:span> ⲛⲁ ⲉϥⲛⲁϫⲱⲕ’ ⲉⲃⲟⲗ’ ⲛ̅ϭⲓ ⲡⲁⲣⲓⲑⲙⲟⲥ ⲙ̅ⲡⲭⲁ‐ <text:line-break/><text:span text:style-name="T1"> </text:span><text:span text:style-name="T2">(96/15) </text:span> ⲟⲥ §ⲉⲓⲥϩⲏⲏⲧⲉ ⲁϩⲓⲧⲥⲉⲃⲟ ⲁⲡⲧⲩⲡⲟⲥ ⲛ̅ⲛ̅‐ <text:line-break/><text:span text:style-name="T1"> </text:span><text:span text:style-name="T2">(96/16) </text:span> ⲁⲣⲭⲱⲛ’ ⲙⲛ̅ ⲑⲩⲗⲏ ⲛ̅ⲧⲁⲩϫⲡⲟϥ ⲛ̅ϩⲏⲧⲥ̅ ⲙⲛ̅ <text:line-break/><text:span text:style-name="T1"> </text:span><text:span text:style-name="T2">(96/17) </text:span> ⲡⲟⲩⲉⲓⲱⲧ’ ⲙⲛ̅ ⲡⲟⲩⲕⲟⲥⲙⲟⲥ §ⲁⲛⲟⲕ’ ⲇⲉ ⲁ‐ <text:line-break/><text:span text:style-name="T1"> </text:span><text:span text:style-name="T2">(96/18) </text:span> ⲉⲓϫⲟⲟⲥ ϫⲉ ⲡϫⲟⲉⲓⲥ ⲙⲏⲧⲓ ⲁⲛⲟⲕ’ ϩⲱ ϯ‐ <text:line-break/><text:span text:style-name="T1"> </text:span><text:span text:style-name="T2">(96/19) </text:span> ⲏⲡ’ ⲁⲧⲟⲩϩⲩⲗⲏ §ⲛ̅ⲧⲟ ⲙⲛ̅ ⲛⲟⲩϣⲏⲣⲉ ⲉⲣⲉⲏⲡ’ <text:line-break/><text:span text:style-name="T1"> </text:span><text:span text:style-name="T2">(96/20) </text:span> ⲁⲡⲉⲓⲱⲧ’ ⲉⲧϣⲟⲟⲡ ϫⲓⲛ ⲛ̅ϣⲟⲣⲡ ⲛ̅ⲧⲁ <text:line-break/><text:span text:style-name="T1"> </text:span><text:span text:style-name="T2">(96/21) </text:span> ⲛⲟⲩⲯⲩⲭⲏ ⲉⲓ 〈ⲉ〉ⲃⲟⲗ ϩⲙ̅ ⲡⲥⲁ ⲛ’ⲧⲡⲉ ⲉⲃⲟⲗ ϩⲙ̅ <text:line-break/><text:span text:style-name="T1"> </text:span><text:span text:style-name="T2">(96/22) </text:span> ⲡⲟⲩⲟⲉⲓⲛ ⲛ̅ⲛⲁⲧ’ⲧⲉⲕⲟ ⲇⲓⲁ ⲧⲟⲩⲧⲟ ⲛ̅ⲉⲝⲟⲩ‐ <text:line-break/><text:span text:style-name="T1"> </text:span><text:span text:style-name="T2">(96/23) </text:span> ⲥⲓⲁ ⲛⲁϣⲧϩⲛⲟ ⲁⲛ ⲉϩⲟⲩⲛ ⲉⲣⲟⲟⲩ ⲉⲧⲃⲉ <text:line-break/><text:span text:style-name="T1"> </text:span><text:span text:style-name="T2">(96/24) </text:span> ⲡⲛ̅ⲁ̅ ⲛ̅ⲧⲁⲗⲏⲑⲉⲓⲁ ⲉⲧⲟⲩⲏϩ ϩⲣⲁⲓ̈ ⲛ̅ϩⲏⲧⲟⲩ <text:line-break/><text:span text:style-name="T1"> </text:span><text:span text:style-name="T2">(96/25) </text:span> ⲟⲩⲟⲛ ⲇⲉ ⲛⲓⲙ’ ⲛ̅ⲧⲁϩⲥⲟⲩⲱⲛ ⲧⲉⲓ̈ϩⲟⲇⲟⲥ <text:line-break/><text:span text:style-name="T1"> </text:span><text:span text:style-name="T2">(96/26) </text:span> ⲛⲁⲉⲓ ⲥⲉϣⲟⲟⲡ’ ⲛ̅ⲁⲑⲁⲛⲁⲧⲟⲥ ϩⲛ̅ ⲧⲙⲏⲧⲉ <text:line-break/><text:span text:style-name="T1"> </text:span><text:span text:style-name="T2">(96/27) </text:span> ⲛ̅ⲣ̅ⲣⲱⲙⲉ ⲉϣⲁⲩⲙⲟⲩ ⲁⲗⲗⲁ ⲡⲉⲥⲡⲉⲣⲙⲁ <text:line-break/><text:span text:style-name="T1"> </text:span><text:span text:style-name="T2">(96/28) </text:span> ⲉⲧⲙ̅ⲙⲁⲩ ⲛⲁⲟⲩⲱⲛϩ ⲁⲛ’ ⲉⲃⲟⲗ ⲧⲉⲛⲟⲩ §ⲁⲗ‐ <text:line-break/><text:span text:style-name="T1"> </text:span><text:span text:style-name="T2">(96/29) </text:span> ⲗⲁ ⲙⲛ̅ⲛ̅ⲥⲁ ϣⲟⲙⲧⲉ ⲛ̅ⲅⲉⲛⲉⲁ ⲁϥⲛⲁⲟⲩⲱⲛϩ <text:line-break/><text:span text:style-name="T1"> </text:span><text:span text:style-name="T2">(96/30) </text:span> ⲉⲃⲟⲗ’ † ⲁϥⲛⲟⲩϫⲉ ⲉⲃⲟⲗ ⲙ̅ⲙⲟⲟⲩ ⲛ̅ⲧⲙⲣ̅ⲣⲉ <text:line-break/><text:span text:style-name="T1"> </text:span><text:span text:style-name="T2">(96/31) </text:span> ⲛ̅ⲧⲡⲗⲁⲛⲏ ⲛ̅ⲉⲝⲟⲩⲥⲓⲁ §ⲁⲛⲟⲕ’ ⲇⲉ ⲡⲉϫⲁⲉⲓ <text:line-break/><text:span text:style-name="T1"> </text:span><text:span text:style-name="T2">(96/32) </text:span> ϫⲉ ⲡϫⲟⲉⲓⲥ ϣⲁ ⲟⲩⲏⲣ’ ⲛ̅ⲭⲣⲟⲛⲟⲥ §ⲡⲉϫⲁϥ’ <text:line-break/><text:span text:style-name="T1"> </text:span><text:span text:style-name="T2">(96/33) </text:span> ⲛⲁⲉⲓ ϫ̣[ⲉ ϩⲟ]ⲧⲁⲛ ⲉⲣϣⲁ ⲡⲣⲱⲙⲉ ⲛ̅ⲁⲗⲏⲑⲓ‐ <text:line-break/><text:span text:style-name="T1"> </text:span><text:span text:style-name="T2">(96/34) </text:span> [ⲛⲟⲥ ⲟⲩⲱ]ⲛϩ ⲉⲃⲟⲗ’ ϩⲛ̅ⲛⲟⲩⲡⲗⲁⲥⲙⲁ <text:line-break/><text:span text:style-name="T1"> </text:span><text:span text:style-name="T2">(96/35) </text:span> [......]ⲁ̣ⲗⲏⲑⲉⲓⲁ ⲡⲉⲛⲧⲁ ⲡⲉⲓⲱⲧ ⲧⲛ̅‐ <text:line-break/><text:span text:style-name="T1"> </text:span><text:span text:style-name="T2">(97/1) </text:span> ⲛⲟⲟⲩϥ §ⲧ̣[ⲟⲧⲉ] ⲡⲉⲧ̣[ⲙ̅]ⲙⲁⲩ ⲛⲁⲧⲁⲙⲟⲟⲩ ⲉ‐ <text:line-break/><text:span text:style-name="T1"> </text:span><text:span text:style-name="T2">(97/2) </text:span> ⲧⲃⲉ ϩⲱⲃ ⲛ[ⲓⲙ] ⲁⲩⲱ ϥⲛⲁⲧⲁϩⲥⲟⲩ ϩⲙ̅ ⲡⲭⲣⲉⲓ‐ <text:line-break/><text:span text:style-name="T1"> </text:span><text:span text:style-name="T2">(97/3) </text:span> ⲥⲙⲁ ⲙ̅ⲡⲱⲛϩ ϣⲁ ⲉⲛⲉϩ ⲡⲁⲉⲓ ⲛ̅ⲧⲁⲩⲧⲁ‐ <text:line-break/><text:span text:style-name="T1"> </text:span><text:span text:style-name="T2">(97/4) </text:span> ⲁϥ ⲛⲁϥ’ ⲉⲃⲟⲗ ϩⲛ̅ ⲧⲅⲉⲛⲉⲁ ⲧⲉⲧⲙ̅ⲙⲛ̅ⲧⲉⲥ <text:line-break/><text:span text:style-name="T1"> </text:span><text:span text:style-name="T2">(97/5) </text:span> ⲣ̅ⲣⲟ §ⲧⲟⲧⲉ ⲥⲉⲛⲁⲛⲟⲩϫⲉ ⲉⲃⲟⲗ’ ⲙⲙⲟⲟⲩ <text:line-break/><text:span text:style-name="T1"> </text:span><text:span text:style-name="T2">(97/6) </text:span> ⲙ̅ⲡⲙⲉⲉⲩⲉ ⲃ̅ⲃⲗ̅ⲗⲉ ⲁⲩⲱ ⲥⲉⲛⲁⲣ̅ⲕⲁⲧⲁⲡⲁ‐ <text:line-break/><text:span text:style-name="T1"> </text:span><text:span text:style-name="T2">(97/7) </text:span> ⲧⲉⲓ ⲙ̅ⲡⲙⲟⲩ ⲛ̅ⲛ̅ⲉⲝⲟⲩⲥⲓⲁ ⲁⲩⲱ ⲥⲉⲛⲁⲃⲱⲕ’ <text:line-break/><text:span text:style-name="T1"> </text:span><text:span text:style-name="T2">(97/8) </text:span> ⲉϩⲣⲁⲓ̈ ⲉⲡⲟⲩⲟⲉⲓⲛ ⲉⲧⲉ ⲙⲛ̅ⲧⲁϥ ⲁⲣⲏϫϥ’ <text:line-break/><text:span text:style-name="T1"> </text:span><text:span text:style-name="T2">(97/9) </text:span> ⲡⲁⲉⲓ ⲉⲧⲉ ⲡⲉⲉⲓⲥⲡⲉⲣⲙⲁ ϣⲟⲟⲡ’ ⲙ̅ⲙⲁⲩ <text:line-break/><text:span text:style-name="T1"> </text:span><text:span text:style-name="T2">(97/10) </text:span> §ⲧⲟⲧⲉ ⲛⲉⲝⲟⲩⲥⲓⲁ ⲥⲉⲛⲁⲕⲱ ⲛ̅ⲥⲱⲟⲩ ⲛ̅ⲛⲟⲩ‐ <text:line-break/><text:span text:style-name="T1"> </text:span><text:span text:style-name="T2">(97/11) </text:span> ⲕⲁⲓⲣⲟⲥ ⲁⲩⲱ ⲛⲟⲩⲁⲅⲅⲉⲗⲟⲥ ⲥⲉⲛⲁⲣⲓⲙⲉ <text:line-break/><text:span text:style-name="T1"> </text:span><text:span text:style-name="T2">(97/12) </text:span> ⲉϫⲛ̅ ⲡⲟⲩⲧⲁⲕⲟ ⲁⲩⲱ ⲛⲟⲩⲇⲁⲓⲙⲱⲛ ⲥⲉⲛⲁ‐ <text:line-break/><text:span text:style-name="T1"> </text:span><text:span text:style-name="T2">(97/13) </text:span> ⲣ̅ϩⲏⲃⲉ ⲉϫⲛ̅ ⲡⲟⲩⲙⲟⲩ §ⲧⲟⲧⲉ ⲛ̅ϣⲏⲣⲉ ⲧⲏ‐ <text:line-break/><text:span text:style-name="T1"> </text:span><text:span text:style-name="T2">(97/14) </text:span> ⲣⲟⲩ ⲙ̅ⲡⲟⲩⲟⲉⲓⲛ ⲥⲉⲛⲁⲥⲟⲩⲱⲛ ⲧⲁⲗⲏⲑⲉⲓ‐ <text:line-break/><text:soft-page-break/><text:span text:style-name="T1"> </text:span><text:span text:style-name="T2">(97/15) </text:span> ⲁ ⲙⲛ̅ ⲧⲟⲩⲛⲟⲩⲛⲉ ϩⲛ̅ ⲟⲩⲙⲉ ⲁⲩⲱ ⲡⲉⲓⲱⲧ’ <text:line-break/><text:span text:style-name="T1"> </text:span><text:span text:style-name="T2">(97/16) </text:span> ⲙ̅ⲡⲧⲏⲣϥ’ ⲙⲛ̅ ⲡⲛ̅ⲁ̅ ⲉⲧⲟⲩⲁⲁⲃ ⲥⲉⲛⲁϫⲟⲟⲥ <text:line-break/><text:span text:style-name="T1"> </text:span><text:span text:style-name="T2">(97/17) </text:span> ⲧⲏⲣⲟⲩ ϩⲛ̅ⲛⲟⲩⲥⲙⲏ ⲟⲩⲱⲧ’ ϫⲉ ⲟⲩⲇⲓⲕⲁⲓ‐ <text:line-break/><text:span text:style-name="T1"> </text:span><text:span text:style-name="T2">(97/18) </text:span> ⲟⲥ ⲧⲉ ⲧⲁⲗⲏⲑⲉⲓⲁ ⲙ̅ⲡⲉⲓⲱⲧ’ ⲁⲩⲱ ⲡϣⲏⲣⲉ <text:line-break/><text:span text:style-name="T1"> </text:span><text:span text:style-name="T2">(97/19) </text:span> ϩⲓϫⲛ̅ ⲡⲧⲏⲣϥ’ ⲁⲩⲱ ⲉⲃⲟⲗ ϩⲓⲧⲛ̅ ⲟⲩⲟⲛ ⲛⲓⲙ <text:line-break/><text:span text:style-name="T1"> </text:span><text:span text:style-name="T2">(97/20) </text:span> ϣⲁ ⲛⲓⲉⲛⲉϩ ⲛ̅ⲉⲛⲉϩ ϩⲁⲅⲓⲟⲥ ϩⲁⲅⲓⲟⲥ ϩⲁ‐ <text:line-break/><text:span text:style-name="T1"> </text:span><text:span text:style-name="T2">(97/21) </text:span> ⲅⲓⲟⲥ ϩⲁⲙⲏⲛ <text:line-break/><text:span text:style-name="T1"> </text:span><text:span text:style-name="T2">(97/22) </text:span> 0ⲧⲑⲩⲡⲟⲥⲧⲁⲥⲓⲥ <text:line-break/><text:span text:style-name="T1"> </text:span><text:span text:style-name="T2">(97/23) </text:span> 0ⲛ̅ⲛ̅ⲁⲣⲭⲱⲛ </text:p>
      <text:p text:style-name="P3"/>
      <text:p text:style-name="P4">( codex II ) On the Origin of the World</text:p>
      <text:p text:style-name="P3"><text:span text:style-name="T1"> </text:span><text:span text:style-name="T2">(97/24) </text:span> §ⲉⲡⲉⲓⲇⲏ ⲟⲩⲟⲛ ⲛⲓⲙ’ ⲛ̅ⲛⲟⲩⲧⲉ ⲙ̅ⲡⲕⲟⲥ‐ <text:line-break/><text:span text:style-name="T1"> </text:span><text:span text:style-name="T2">(97/25) </text:span> ⲙⲟⲥ ⲁⲩⲱ ⲣ̅ⲣⲱⲙⲉ ⲥⲉϫⲱ ⲙ̅ⲙⲟⲥ ϫⲉ ⲙⲛ̅ <text:line-break/><text:span text:style-name="T1"> </text:span><text:span text:style-name="T2">(97/26) </text:span> ⲗⲁⲁⲩⲉ ϣⲟⲟⲡ’ ϩⲁ ⲧⲉϩⲏ ⲙ̅ⲡⲭⲁⲟⲥ ⲁⲛⲟⲕ’ <text:line-break/><text:span text:style-name="T1"> </text:span><text:span text:style-name="T2">(97/27) </text:span> ⲇⲉ ϯⲛⲁⲣ̅ⲁⲡⲟⲇⲓⲕⲛⲩⲉ ϫⲉ ⲁ[ⲩ]ⲣ̣̅ⲡ̣ⲗⲁⲛⲁ <text:line-break/><text:span text:style-name="T1"> </text:span><text:span text:style-name="T2">(97/28) </text:span> ⲧⲏⲣⲟⲩ ⲉⲛ’ⲥⲉⲥⲟⲟⲩⲛ ⲁⲛ ⲛ̅ⲧ[ⲥⲩⲥⲧⲁⲥ]ⲓ̣ⲥ̣ <text:line-break/><text:span text:style-name="T1"> </text:span><text:span text:style-name="T2">(97/29) </text:span> ⲙ̅ⲡⲭⲁⲟⲥ ⲙⲛ̅ ⲧⲉϥⲛⲟⲩⲛⲉ ⲧⲁ̣[ⲉⲓ ⲇⲉ ⲧⲉ ⲧⲁ]‐ <text:line-break/><text:span text:style-name="T1"> </text:span><text:span text:style-name="T2">(97/30) </text:span> ⲡⲟⲇⲓⲝⲉⲓⲥ §ⲉϣϫⲉ ⲥⲣ̅ⲥⲩⲙ̣’[ⲫⲱⲛⲉⲓ ⲙⲛ̅] <text:line-break/><text:span text:style-name="T1"> </text:span><text:span text:style-name="T2">(98/1) </text:span> [ⲣ̅]ⲣⲱⲙⲉ ⲧⲏⲣⲟⲩ ⲉⲧⲃⲉ̣ ⲡⲭⲁ̣[ⲟⲥ] ϫ̣ⲉ ⲟⲩⲕⲁ‐ <text:line-break/><text:span text:style-name="T1"> </text:span><text:span text:style-name="T2">(98/2) </text:span> ⲕⲉ ⲡⲉ’ ⲟⲩⲉⲃⲟⲗ ⲇⲉ ⲡⲉ ϩⲛ̣̅ ⲟ̣ⲩϩⲁⲓ̈ⲃⲉⲥ <text:line-break/><text:span text:style-name="T1"> </text:span><text:span text:style-name="T2">(98/3) </text:span> ⲁⲩⲙⲟⲩⲧⲉ ⲉⲣⲟϥ ϫⲉ ⲕⲁⲕⲉ’ ⲑϩⲣⲁⲓ̈ⲃⲉⲥ ⲇⲉ <text:line-break/><text:span text:style-name="T1"> </text:span><text:span text:style-name="T2">(98/4) </text:span> ⲟⲩⲉⲓ ⲉⲃⲟⲗ ⲡⲉ ϩⲛ̅ⲛⲟⲩⲉⲣⲅⲟⲛ ⲉϥϣⲟⲟⲡ’ <text:line-break/><text:span text:style-name="T1"> </text:span><text:span text:style-name="T2">(98/5) </text:span> ϫⲓⲛ ⲧⲉϩⲟⲩⲉⲓⲧⲉ ϥⲟⲩⲟⲛϩ ⲇⲉ ⲉⲃⲟⲗ ϫⲉ ⲛⲉϥ’‐ <text:line-break/><text:span text:style-name="T1"> </text:span><text:span text:style-name="T2">(98/6) </text:span> ϣⲟⲟⲡ’ ⲉⲙ’ⲡⲁⲧⲉ ⲡⲭⲁⲟⲥ ϣⲱⲡⲉ ⲛ̅ⲧⲁϥⲟⲩ‐ <text:line-break/><text:span text:style-name="T1"> </text:span><text:span text:style-name="T2">(98/7) </text:span> ⲱϩ ⲇⲉ ⲛ̅ⲥⲁ ⲡϣⲟⲣⲡ’ ⲛ̅ⲉⲣⲅⲟⲛ’ §ⲙⲁⲣⲛ̅ⲉⲓ ⲇⲉ <text:line-break/><text:span text:style-name="T1"> </text:span><text:span text:style-name="T2">(98/8) </text:span> ⲉϩⲟⲩⲛ’ ⲉⲧⲙⲉ’ ⲉϩⲟⲩⲛ ⲇⲉ’ ⲁⲛ’ ⲉⲡϣⲟⲣⲡ’ <text:line-break/><text:span text:style-name="T1"> </text:span><text:span text:style-name="T2">(98/9) </text:span> ⲛ̅ⲉⲣⲅⲟⲛ ⲡⲁⲉⲓ ⲛ̅ⲧⲁ ⲡⲭⲁⲟⲥ ⲉⲓ ⲉⲃⲟⲗ ⲛ̅ϩⲏⲧϥ’ <text:line-break/><text:span text:style-name="T1"> </text:span><text:span text:style-name="T2">(98/10) </text:span> ⲁⲩⲱ ⲛ̅ⲧⲉⲉⲓϩⲉ ⲥⲛⲁⲟⲩⲱⲛϩ ⲉⲃⲟⲗ ⲛ̅ϭⲓ ⲧⲁ‐ <text:line-break/><text:span text:style-name="T1"> </text:span><text:span text:style-name="T2">(98/11) </text:span> ⲡⲟⲇⲓⲝⲉⲓⲥ ⲛ̅ⲧⲙⲉ §ⲧⲫⲩⲥⲉⲓⲥ ⲇⲉ ⲛ̅ⲛⲓⲁⲧ’‐ <text:line-break/><text:span text:style-name="T1"> </text:span><text:span text:style-name="T2">(98/12) </text:span> ⲙⲟⲩ ⲛ̅ⲧⲁⲣⲉⲥϫⲱⲕ’ ⲉⲃⲟⲗ ϩⲙ̅ ⲡⲉⲧⲉ ⲙⲛ̅ⲧⲉϥ’ <text:line-break/><text:span text:style-name="T1"> </text:span><text:span text:style-name="T2">(98/13) </text:span> ⲁⲣⲏϫϥ ⲧⲟⲧⲉ ⲟⲩⲉⲓⲛⲉ ⲁϥϩϯⲉ ⲉⲃⲟⲗ ϩⲛ̅ ⲧⲡⲓ‐ <text:line-break/><text:span text:style-name="T1"> </text:span><text:span text:style-name="T2">(98/14) </text:span> ⲥⲧⲓⲥ ⲉⲩⲙⲟⲩⲧⲉ ⲉⲣⲟϥ ϫⲉ ⲧⲥⲟⲫⲓⲁ ⲁϥ’ⲟⲩ‐ <text:line-break/><text:span text:style-name="T1"> </text:span><text:span text:style-name="T2">(98/15) </text:span> ⲱϣ ⲁϥϣⲱⲡⲉ ⲛ̅ⲛⲟⲩⲉⲣⲅⲛ ⲉϥⲉ〈ⲓ〉ⲛⲉ <text:line-break/><text:span text:style-name="T1"> </text:span><text:span text:style-name="T2">(98/16) </text:span> ⲙ̅ⲡⲟⲩⲟⲉⲓⲛ’ ⲉⲧϣⲟⲟⲡ’ ⲛ̅ϣⲟⲣⲡ’ ⲁⲩⲱ <text:line-break/><text:span text:style-name="T1"> </text:span><text:span text:style-name="T2">(98/17) </text:span> ⲛ̅ⲧⲉⲩⲛⲟⲩ ⲁϥⲟⲩⲱⲛϩ ⲉⲃⲟⲗ ⲛ̅ϭⲓ ⲡⲉⲥⲟⲩ‐ <text:line-break/><text:span text:style-name="T1"> </text:span><text:span text:style-name="T2">(98/18) </text:span> ⲱϣ’ ⲉϥⲟ ⲛ̅ⲛⲓⲛⲉ ⲙ̅ⲡⲉ ⲉⲩⲛ̅ⲧⲁϥ ⲙ̅ⲙⲁⲩ <text:line-break/><text:span text:style-name="T1"> </text:span><text:span text:style-name="T2">(98/19) </text:span> ⲛ̅ⲛⲟⲩⲙⲉⲅⲉⲑⲟⲥ ⲉⲛⲥⲉⲁϣⲙⲉⲉⲩ ⲁⲛ’ ⲉⲣⲟϥ’ <text:line-break/><text:span text:style-name="T1"> </text:span><text:span text:style-name="T2">(98/20) </text:span> ⲉϥϩⲛ̅ ⲧⲙⲏⲧⲉ ⲛ̅ⲛⲓⲁⲧ’ⲙⲟⲩ ⲙⲛ̅ ⲛⲉⲛⲧⲁϩ’‐ <text:line-break/><text:span text:style-name="T1"> </text:span><text:span text:style-name="T2">(98/21) </text:span> ϣⲱⲡⲉ ⲙ̅ⲙⲛ̅ⲛ̅ⲥⲱⲟⲩ ⲛ̅ⲑⲉ ⲉⲧⲙ̅ⲡⲉ’ ⲉ‐ <text:line-break/><text:span text:style-name="T1"> </text:span><text:span text:style-name="T2">(98/22) </text:span> ⲥⲟ ⲙ̅ⲡⲁⲣⲁⲡⲉⲧⲁⲥⲙⲁ ⲉϥⲡⲱⲣϫ’ ⲟⲩⲧⲉ <text:line-break/><text:span text:style-name="T1"> </text:span><text:span text:style-name="T2">(98/23) </text:span> ⲣ̅ⲣⲱⲙⲉ ⲙⲛ̅ ⲛⲁ ⲡⲥⲁ ⲛⲧⲡⲉ §ⲡⲓⲁⲓⲱⲛ’ ⲇⲉ <text:line-break/><text:span text:style-name="T1"> </text:span><text:span text:style-name="T2">(98/24) </text:span> ⲛ̅ⲧⲉ ⲧⲙⲉ ⲙⲛ̅ⲧⲉϥ ϩⲁⲓ̈ⲃⲉⲥ ⲙ̅ⲙⲁⲩ † ⲙ̅ⲡⲉϥ’‐ <text:line-break/><text:span text:style-name="T1"> </text:span><text:span text:style-name="T2">(98/25) </text:span> ⲃⲟⲗ ϫⲉ ⲡⲟⲩⲟⲉⲓⲛ ⲉⲧⲉ ⲙⲛ̅ⲧⲉϥ ϣⲓ ϩⲙ̅ <text:line-break/><text:span text:style-name="T1"> </text:span><text:span text:style-name="T2">(98/26) </text:span> ⲙⲁ ⲛⲓⲙ’ ⲛ̅ϩⲏⲧϥ̅ ⲡⲉϥⲥⲁ ⲛⲃⲟⲗ ⲇⲉ ⲟⲩϩⲁ‐ <text:line-break/><text:span text:style-name="T1"> </text:span><text:span text:style-name="T2">(98/27) </text:span> ⲉⲓⲃⲉ ⲡⲉ’ ⲁⲩⲙⲟⲩⲧⲉ ⲉⲣⲟϥ’ ϫⲉ ⲕⲁⲕⲉ ⲉⲃⲟⲗ <text:line-break/><text:span text:style-name="T1"> </text:span><text:span text:style-name="T2">(98/28) </text:span> ⲛ̅ϩⲏⲧϥ’ ⲁⲩⲇⲩⲛⲁⲙⲓⲥ ⲟⲩⲱⲛϩ ⲉⲃⲟⲗ ϩⲓ‐ <text:line-break/><text:span text:style-name="T1"> </text:span><text:span text:style-name="T2">(98/29) </text:span> ϫⲙ̅ ⲡⲕⲁⲕⲉ ϯϩⲁⲉⲓⲃⲉ ⲇⲉ ⲁⲛⲇⲩⲛⲁⲙⲓⲥ <text:line-break/><text:span text:style-name="T1"> </text:span><text:span text:style-name="T2">(98/30) </text:span> ⲛ̅ⲧⲁϩϣⲱⲡⲉ ⲙⲛ̅ⲛ̅ⲥⲱⲟⲩ ⲁⲩⲙⲟⲩⲧⲉ ⲉⲣⲟϥ’ <text:line-break/><text:span text:style-name="T1"> </text:span><text:span text:style-name="T2">(98/31) </text:span> ϫⲉ ⲡⲭⲁⲟⲥ 〈ⲉⲧ〉ⲉⲙⲛ̅ⲧⲉϥ’ ⲁⲣⲏϫϥ’ † ⲉⲃⲟⲗ ⲛ̅ϩⲏⲧϥ’ † <text:line-break/><text:span text:style-name="T1"> </text:span><text:span text:style-name="T2">(98/32) </text:span> ⲁ̣ⲅⲉⲛ[ⲟⲥ ⲛⲓ]ⲙ̣’ ⲛ̅ⲛⲟⲩⲧⲉ ϯ ⲟⲩⲱ ⲉϩⲣⲁⲓ̈ ⲁⲩ‐ <text:line-break/><text:span text:style-name="T1"> </text:span><text:span text:style-name="T2">(98/33) </text:span> [.......]ⲱⲡⲟⲩⲁ’ ⲙⲛ̅ ⲡⲙⲁ ⲧⲏⲣϥ’ ϩⲱⲥ‐ <text:line-break/><text:span text:style-name="T1"> </text:span><text:span text:style-name="T2">(98/34) </text:span> [ⲧⲉ ⲁⲑϩⲁⲉⲓⲃ]ⲉ ⲁⲛ ⲟⲩϩⲁⲥ ⲛ̅ⲥⲁ ⲡϣⲟⲣⲡ’ <text:line-break/><text:span text:style-name="T1"> </text:span><text:span text:style-name="T2">(99/1) </text:span> ⲛ̅ⲉⲣⲅⲟⲛ ⲛ̣̅[ⲧⲁⲥ]ⲟ̣ⲩⲱⲛϩ ⲉⲃⲟⲗ 〈ⲙ̅〉ⲡⲛⲟⲩⲛ’ ⲉ‐ <text:line-break/><text:span text:style-name="T1"> </text:span><text:span text:style-name="T2">(99/2) </text:span> ⲃⲟⲗ ϩⲛ̅ ⲧⲡⲓⲥⲧ̣ⲓ̣ⲥ’ ⲛ̅ⲧⲁⲛϣⲁϫⲉ ⲉⲣⲟⲥ §ⲧⲟ‐ <text:line-break/><text:span text:style-name="T1"> </text:span><text:span text:style-name="T2">(99/3) </text:span> ⲧⲉ ⲁⲑϩⲁⲓ̈ⲃⲉⲥ’ ⲣ̅ⲁⲓⲥⲑⲁⲛⲉ ϫⲉ ⲟⲩⲛ̅ ⲡⲉⲧ’‐ <text:line-break/><text:span text:style-name="T1"> </text:span><text:span text:style-name="T2">(99/4) </text:span> ϫⲟⲟⲣ’ ⲉⲣⲟⲥ’ ⲁⲥⲕⲱϩ ⲁⲩⲱ ⲛ̅ⲧⲁⲣⲉⲥⲩⲟ’ⲩ← <text:line-break/><text:span text:style-name="T1"> </text:span><text:span text:style-name="T2">(99/5) </text:span> ⲉⲃⲟⲗ ϩⲓⲧⲟⲟⲧⲥ̅ ⲟⲩⲁⲁⲧⲥ̅ ⲛ̅ⲧⲉⲩⲛⲟⲩ ⲁⲥ‐ <text:line-break/><text:soft-page-break/><text:span text:style-name="T1"> </text:span><text:span text:style-name="T2">(99/6) </text:span> ϫⲡⲟ ⲙ̅ⲡⲕⲱϩ ϫⲓⲛ’ ⲙ̅ⲫⲟⲟⲩ ⲉⲧⲙ̅ⲙⲁⲩ <text:line-break/><text:span text:style-name="T1"> </text:span><text:span text:style-name="T2">(99/7) </text:span> ⲁⲥⲟⲩⲱⲛϩ ⲉⲃⲟⲗ ⲛ̅ϭⲓ ⲧⲁⲣⲭⲏ ⲙ̅ⲡⲕⲱϩ ϩⲛ̅ <text:line-break/><text:span text:style-name="T1"> </text:span><text:span text:style-name="T2">(99/8) </text:span> ⲛⲁⲓⲱⲛ ⲧⲏⲣⲟⲩ’ ⲙⲛ̅ ⲛⲉⲩⲕⲟⲥⲙⲟⲥ’ ⲡⲕⲱϩ <text:line-break/><text:span text:style-name="T1"> </text:span><text:span text:style-name="T2">(99/9) </text:span> ⲇⲉ ⲉⲧⲙ̅ⲙⲁⲩ ⲁⲩϩⲉ ⲉⲣⲟϥ’ ⲉϥⲟ ⲛ̅ⲟⲩϩⲉ ⲉ‐ <text:line-break/><text:span text:style-name="T1"> </text:span><text:span text:style-name="T2">(99/10) </text:span> ⲙⲛ̅ ⲡⲛ̅ⲁ̅ ⲛ̅ϩⲏⲧϥ’ ⲁϥϣⲱⲡⲉ ⲛ̅ⲑⲉ ⲛ̅ⲛⲓϩⲁ‐ <text:line-break/><text:span text:style-name="T1"> </text:span><text:span text:style-name="T2">(99/11) </text:span> ⲉⲓⲃⲉⲥ ϩⲛ̅ⲛⲟⲩⲛⲟϭ ⲛ̅ⲟⲩⲥⲓⲁ ⲙ̅ⲙⲟⲟⲩ ⲧⲟ‐ <text:line-break/><text:span text:style-name="T1"> </text:span><text:span text:style-name="T2">(99/12) </text:span> ⲧⲉ ϯⲭⲟⲗⲏ ⲛ̅ⲧⲁϩϣⲱⲡⲉ ⲉⲃⲟⲗ ϩⲛ̅ ⲑⲁ‐ <text:line-break/><text:span text:style-name="T1"> </text:span><text:span text:style-name="T2">(99/13) </text:span> ⲉⲓⲃⲉⲥ ⲁⲩⲛⲟϫⲥ̅ ⲁⲩⲙⲉⲣⲟⲥ ⲛ̅ⲧⲉ ⲡⲭⲁⲟⲥ <text:line-break/><text:span text:style-name="T1"> </text:span><text:span text:style-name="T2">(99/14) </text:span> ϫⲓⲙ ⲫⲟⲟⲩ ⲉⲧⲙ̅ⲙⲁⲩ ⲁⲟⲩⲥⲓⲁ ⲙ̅ⲙⲟⲟⲩ <text:line-break/><text:span text:style-name="T1"> </text:span><text:span text:style-name="T2">(99/15) </text:span> ⲟⲩⲱⲛϩ ⲉⲃⲟⲗ ⲁⲩⲱ ⲡⲉⲛⲧⲁϩⲱⲧⲉ ϩⲣⲁⲓ̈ <text:line-break/><text:span text:style-name="T1"> </text:span><text:span text:style-name="T2">(99/16) </text:span> ⲛ̅ϩⲏⲧⲥ̅ ⲁϥϩϯⲉ ⲉⲃⲟⲗ ⲉϥⲟⲩⲟⲛϩ ⲉⲃⲟⲗ <text:line-break/><text:span text:style-name="T1"> </text:span><text:span text:style-name="T2">(99/17) </text:span> ϩⲙ̅ ⲡⲭⲁⲟⲥ ⲛ̅ⲑⲉ ⲛ̅ⲧⲉⲧⲙⲓⲥⲉ ⲛ̅ⲛⲟⲩⲕⲟⲩ‐ <text:line-break/><text:span text:style-name="T1"> </text:span><text:span text:style-name="T2">(99/18) </text:span> ⲉⲓ ⲛⲉⲥⲡⲉⲣⲓⲥⲥⲟⲛ’ ⲧⲏⲣⲟⲩ ϣⲁⲩϩⲁⲉⲓⲉ <text:line-break/><text:span text:style-name="T1"> </text:span><text:span text:style-name="T2">(99/19) </text:span> ⲧⲁⲉⲓ ⲧⲉ ⲑⲉ ⲛ̅ⲑⲩⲗⲏ ⲛ̅ⲧⲁⲥϣⲱⲡⲉ ⲉⲃⲟⲗ <text:line-break/><text:span text:style-name="T1"> </text:span><text:span text:style-name="T2">(99/20) </text:span> ϩⲛ̅ ⲑⲁⲉⲓⲃⲉⲥ ⲁⲩⲛⲟϫⲥ̅ ⲉⲩⲥⲁ ⲁⲩⲱ ⲙ̅ⲡⲉⲥ‐ <text:line-break/><text:span text:style-name="T1"> </text:span><text:span text:style-name="T2">(99/21) </text:span> ⲉⲓ ⲉⲃⲟⲗ ϩⲙ̅ ⲡⲭⲁⲟⲥ ⲁⲗⲗⲁ ⲛⲉⲥϩⲙ̅ ⲡⲭⲁ‐ <text:line-break/><text:span text:style-name="T1"> </text:span><text:span text:style-name="T2">(99/22) </text:span> ⲟⲥ ⲛ̅ϭⲓ ⲑⲩⲗⲏ ⲉⲥϩⲛ̅ ⲟⲩⲙⲉⲣⲟⲥ ⲙ̅ⲙⲟϥ <text:line-break/><text:span text:style-name="T1"> </text:span><text:span text:style-name="T2">(99/23) </text:span> §ⲛ̅ⲧⲁⲣⲉ ⲛⲁⲉⲓ ⲇⲉ ϣⲱⲡⲉ ⲧⲟⲧⲉ ⲁⲥⲉⲓ ⲛ̅ϭⲓ <text:line-break/><text:span text:style-name="T1"> </text:span><text:span text:style-name="T2">(99/24) </text:span> ⲧⲡⲓⲥⲧⲓⲥ ⲁⲥⲟⲩⲱⲛ’ ⲉⲃⲟⲗ ϩⲓϫⲛ̅ ⲑⲩⲗⲏ ⲙ̅‐ <text:line-break/><text:span text:style-name="T1"> </text:span><text:span text:style-name="T2">(99/25) </text:span> ⲡⲭⲁⲟⲥ ⲧⲁⲉⲓ ⲉⲛⲧⲁⲩⲛⲟϫⲥ̅ ⲛ̅ⲑⲉ ⲛ̅ⲛⲟⲩ‐ <text:line-break/><text:span text:style-name="T1"> </text:span><text:span text:style-name="T2">(99/26) </text:span> ϩⲟⲩⲉ ⲛⲉ ⲙⲛ̅ ⲡⲛ̅ⲁ̅ ⲅⲁⲣ ⲛ̅ϩⲏⲧϥ̅ ϫⲉ ⲡⲏ ⲅⲁⲣ <text:line-break/><text:span text:style-name="T1"> </text:span><text:span text:style-name="T2">(99/27) </text:span> ⲧⲏⲣϥ ⲟⲩⲕⲁⲕⲉ ⲡⲉ ⲉⲙⲛ̅ⲧⲁϥ’ ⲁⲣⲏϫϥ’ <text:line-break/><text:span text:style-name="T1"> </text:span><text:span text:style-name="T2">(99/28) </text:span> ⲁⲩⲱ ⲟⲩⲙⲟⲟⲩ ⲉⲙⲛ̅ⲧⲁϥ’ ϣⲓⲕ’ ⲙ̅ⲙⲁⲩ’ <text:line-break/><text:span text:style-name="T1"> </text:span><text:span text:style-name="T2">(99/29) </text:span> §ⲛ̅ⲧⲁⲣⲉ ⲧⲡⲓⲥⲧⲓⲥ ⲇⲉ ⲛⲁⲩ ⲁⲡⲉⲛⲧⲁϩϣⲱ‐ <text:line-break/><text:span text:style-name="T1"> </text:span><text:span text:style-name="T2">(99/30) </text:span> ⲡⲉ ⲉⲃⲟⲗ ϩⲙ̅ ⲡⲉⲥϣⲧⲁ ⲁⲥϣⲧⲟⲣⲧⲣ̅ <text:line-break/><text:span text:style-name="T1"> </text:span><text:span text:style-name="T2">(99/31) </text:span> ⲡϣⲧⲟⲣⲧⲣ̅ ⲇⲉ ⲁϥ’ⲟⲩⲱⲛϩ ⲉⲃⲟⲗ ⲛ̅ⲛⲟⲩ‐ <text:line-break/><text:span text:style-name="T1"> </text:span><text:span text:style-name="T2">(99/32) </text:span> ⲉⲣⲅⲟⲛ ⲛ̅ϩⲣ̅ⲧⲉ ⲁϥⲡⲱⲧ ⲇⲉ [ⲉⲣⲁⲧ]ⲥ̣ ϩⲙ̅ <text:line-break/><text:span text:style-name="T1"> </text:span><text:span text:style-name="T2">(99/33) </text:span> ⲡⲭⲁⲟⲥ ⲁⲥⲕⲟⲧⲥ̅ ⲇⲉ ⲉⲣⲟϥ’ ⲁ̣[ⲥⲛⲓϥⲉ ⲉ]‐ <text:line-break/><text:span text:style-name="T1"> </text:span><text:span text:style-name="T2">(99/34) </text:span> ϩⲟⲩⲛ ϩⲙ̅ ⲡⲉϥϩⲟ ϩⲙ̅ ⲡⲛⲟⲩ[ⲛ ⲡⲉⲧⲙ̅]‐ <text:line-break/><text:span text:style-name="T1"> </text:span><text:span text:style-name="T2">(100/1) </text:span> ⲡ̣ⲓⲧⲛ̅ ⲛⲙ̅ⲡⲏⲩⲉ ⲧ̣ⲏ̣[ⲣⲟ]ⲩ §ⲧ̣[ⲡⲓ]ⲥ̣ⲧ̣ⲓ̣ⲥ ⲇⲉ <text:line-break/><text:span text:style-name="T1"> </text:span><text:span text:style-name="T2">(100/2) </text:span> ⲧⲥⲟⲫⲓⲁ ⲛ̅ⲧⲁⲣⲉⲥⲟⲩⲱϣ [ⲁ]ⲧ̣ⲣⲉ ⲡⲏ ⲉⲧⲉ <text:line-break/><text:span text:style-name="T1"> </text:span><text:span text:style-name="T2">(100/3) </text:span> ⲙⲛ̅ⲧⲉϥ’ ⲡⲛ̅ⲁ̅ ϫⲓ ⲧⲩⲡⲟⲥ ⲛ̅ⲛⲟⲩⲉⲓⲛⲉ <text:line-break/><text:span text:style-name="T1"> </text:span><text:span text:style-name="T2">(100/4) </text:span> ⲛ̅ϥⲣ̅ⲁⲣⲭⲉⲓ ⲉϫⲛ̅ ⲑⲩⲗⲏ’ ⲁⲩⲱ ⲉϫⲛ̅ ⲛⲉⲥ‐ <text:line-break/><text:span text:style-name="T1"> </text:span><text:span text:style-name="T2">(100/5) </text:span> ⲇⲩⲛⲁⲙⲓⲥ ⲧⲏⲣⲟⲩ ⲁϥⲟⲩⲱⲛϩ ⲉⲃⲟⲗ’ ⲛ̅‐ <text:line-break/><text:span text:style-name="T1"> </text:span><text:span text:style-name="T2">(100/6) </text:span> ϣⲟⲣⲡ’ ⲛ̅ϭⲓ ⲟⲩⲁⲣⲭⲱⲛ ⲉⲃⲟⲗ ϩⲛ̅ ⲙ̅ⲙⲟ‐ <text:line-break/><text:span text:style-name="T1"> </text:span><text:span text:style-name="T2">(100/7) </text:span> ⲟⲩ ⲉϥⲟ ⲛ̅ⲛⲓⲛⲉ ⲙ̅ⲙⲟⲩⲉⲓ ⲉⲩϩⲟⲩⲧⲥϩⲓⲙⲉ <text:line-break/><text:span text:style-name="T1"> </text:span><text:span text:style-name="T2">(100/8) </text:span> ⲡⲉ ⲉⲩⲛ̅ⲧⲁϥ’ ⲛ̅ⲟⲩⲛⲟϭ ⲛ̅ⲉⲝⲟⲩⲥⲓⲁ ⲛ̅ϩⲣⲁⲓ̈ <text:line-break/><text:span text:style-name="T1"> </text:span><text:span text:style-name="T2">(100/9) </text:span> ⲛ̅ϩⲏⲧϥ̅ ⲉϥⲥⲟⲟⲩⲛ ⲇⲉ ⲁⲛ ϫⲉ ⲛ̅ⲧⲁϥϣⲱ‐ <text:line-break/><text:span text:style-name="T1"> </text:span><text:span text:style-name="T2">(100/10) </text:span> ⲡⲉ ⲉⲃⲟⲗ ⲧⲱⲛ ⲧⲡⲓⲥⲧⲓⲥ ⲇⲉ ⲧⲥⲟⲫⲓⲁ ⲛ̅‐ <text:line-break/><text:span text:style-name="T1"> </text:span><text:span text:style-name="T2">(100/11) </text:span> ⲧⲁⲣⲉⲥⲛⲁⲩ ⲉⲣⲟϥ’ ϩⲙ̅ ⲡϣⲓⲕ’ ⲛ̅ⲙ̅ⲙⲟⲟⲩ ⲉϥ‐ <text:line-break/><text:span text:style-name="T1"> </text:span><text:span text:style-name="T2">(100/12) </text:span> ⲕⲓⲙ’ ⲡⲉϫⲁⲥ ⲛⲁϥ’ ϫⲉ ⲡⲛⲉⲁⲛⲓⲥⲕⲟⲥ ⲉ‐ <text:line-break/><text:span text:style-name="T1"> </text:span><text:span text:style-name="T2">(100/13) </text:span> ⲣⲓⲇⲓⲁⲡⲉⲣⲁ ϣⲁ ⲛⲓⲙⲁ’ ⲉⲧⲉ ⲡⲉϥⲃⲱⲗ ⲡⲉ <text:line-break/><text:span text:style-name="T1"> </text:span><text:span text:style-name="T2">(100/14) </text:span> ⲓ̅̈̅ⲁ̅ⲗ̅ⲇ̅ⲁ̅ⲃ̅ⲁ̅ⲱ̅ⲑ̅ §ϫⲓⲙ ⲫⲟⲟⲩ ⲉⲧⲙ̅ⲙⲁⲩ ⲁⲧⲁⲣ‐ <text:line-break/><text:span text:style-name="T1"> </text:span><text:span text:style-name="T2">(100/15) </text:span> ⲭⲏ ⲙ̅ⲡϣⲁϫⲉ ⲟⲩⲱⲛϩ ⲡⲁⲉⲓ ⲛ̅ⲧⲁϩⲡⲱϩ <text:line-break/><text:span text:style-name="T1"> </text:span><text:span text:style-name="T2">(100/16) </text:span> ϣⲁ ⲛ̅ⲛⲟⲩⲧⲉ ⲙⲛ̅ ⲛ̅ⲁⲅ’ⲅⲉⲗⲟⲥ ⲙⲛ̅ ⲛ̅ⲣⲱⲙⲉ <text:line-break/><text:span text:style-name="T1"> </text:span><text:span text:style-name="T2">(100/17) </text:span> ⲁⲩⲱ ⲡⲉⲛ’ⲧⲁϩϣⲱⲡⲉ ϩⲓⲧⲙ̅ ⲡϣⲁϫⲉ ⲁⲩ‐ <text:line-break/><text:span text:style-name="T1"> </text:span><text:span text:style-name="T2">(100/18) </text:span> ϫⲟⲕϥ’ ⲉⲃⲟⲗ’ ⲛ̅ϭⲓ ⲛ̅ⲛⲟⲩⲧⲉ ⲙⲛ̅ ⲛ̅ⲁⲅⲅⲉ‐ <text:line-break/><text:soft-page-break/><text:span text:style-name="T1"> </text:span><text:span text:style-name="T2">(100/19) </text:span> ⲗⲟⲥ ⲙⲛ̅ ⲛ̅ⲣⲱⲙⲉ §ⲡⲁⲣⲭⲱⲛ ϭⲉ ⲓ̅̈̅ⲁ̅ⲗ̅ⲧ̅ⲁ̅ⲃ̅ⲁ̅ⲱ̅ⲑ̅ <text:line-break/><text:span text:style-name="T1"> </text:span><text:span text:style-name="T2">(100/20) </text:span> ϥⲟ ⲛ̅ⲁⲧⲥⲟⲟⲩⲛ’ ⲁⲧⲇⲩⲛⲁⲙⲓⲥ ⲛ̅ⲧⲡⲓⲥⲧⲓⲥ <text:line-break/><text:span text:style-name="T1"> </text:span><text:span text:style-name="T2">(100/21) </text:span> ⲙ̅ⲡⲉϥⲛⲁⲩ ⲁⲡⲉⲥϩⲟ ⲁⲗⲗⲁ ⲁϥⲛⲁⲩ ⲁⲡⲉⲓ‐ <text:line-break/><text:span text:style-name="T1"> </text:span><text:span text:style-name="T2">(100/22) </text:span> ⲛⲉ ⲛ̅ⲧⲁϩϣⲁϫⲉ ⲛⲙ̅ⲙⲁϥ’ ϩⲙ̅ ⲡⲙⲟⲟⲩ <text:line-break/><text:span text:style-name="T1"> </text:span><text:span text:style-name="T2">(100/23) </text:span> ⲁⲩⲱ ⲉⲃⲟⲗ ϩⲛ̅ ⲧⲉⲥⲙⲏ ⲉⲧⲙ̅ⲙⲁⲩ ⲁϥⲙⲟⲩ‐ <text:line-break/><text:span text:style-name="T1"> </text:span><text:span text:style-name="T2">(100/24) </text:span> ⲧⲉ ⲉⲣⲟϥ ϫⲉ ⲓ̈ⲁⲗⲇⲁⲱⲑ ⲛ̅ⲧⲉⲗⲉⲓⲟⲥ ⲇⲉ <text:line-break/><text:span text:style-name="T1"> </text:span><text:span text:style-name="T2">(100/25) </text:span> ⲉⲩⲙⲟⲩⲧⲉ ⲉⲣⲟϥ’ ϫⲉ ⲁⲣⲓⲁⲏⲗ ϫⲉ ⲛⲉⲩⲉⲓ‐ <text:line-break/><text:span text:style-name="T1"> </text:span><text:span text:style-name="T2">(100/26) </text:span> ⲛⲉ ⲙ̅ⲙⲟⲩⲉⲓ ⲡⲉ §ⲛ̅ⲧⲁⲣⲉ ⲡⲁⲉⲓ ⲇⲉ ϣⲱⲡⲉ <text:line-break/><text:span text:style-name="T1"> </text:span><text:span text:style-name="T2">(100/27) </text:span> ⲉⲩⲛ̅ⲧⲁϥ ⲙ̅ⲙⲁⲩ ⲛ̅ⲧⲉⲝⲟⲩⲥⲓⲁ’ ⲛ̅ⲑⲩⲗⲏ <text:line-break/><text:span text:style-name="T1"> </text:span><text:span text:style-name="T2">(100/28) </text:span> ⲁⲧⲡⲓⲥⲧⲓⲥ ⲧⲥⲟⲫⲓⲁ ⲣ̅ⲁⲛⲁⲭⲱⲣⲉⲓ ⲉϩⲣⲁⲓ̈ <text:line-break/><text:span text:style-name="T1"> </text:span><text:span text:style-name="T2">(100/29) </text:span> ⲉⲡⲉⲥⲟⲩⲟⲉⲓⲛ’ §ⲛ̅ⲧⲁⲣⲉ ⲡⲓⲁⲣⲭⲱⲛ ⲛⲁⲩ’ <text:line-break/><text:span text:style-name="T1"> </text:span><text:span text:style-name="T2">(100/30) </text:span> ⲉⲡⲉϥⲙⲉⲅⲉⲑⲟⲥ ⲁⲩⲱ ⲛ̅ⲧⲁϥ’ ⲟⲩⲁⲁⲧϥ’ <text:line-break/><text:span text:style-name="T1"> </text:span><text:span text:style-name="T2">(100/31) </text:span> ⲡⲉⲛⲧⲁϥⲛⲁⲩ ⲉⲣⲟϥ ⲙ̅ⲡⲉϥⲛⲁⲩ ⲉⲕⲉⲟⲩⲁ <text:line-break/><text:span text:style-name="T1"> </text:span><text:span text:style-name="T2">(100/32) </text:span> ⲉⲓ ⲙⲏⲧⲓ ⲁ̣ⲙ̣ⲟⲟⲩ ϩⲓ ⲕⲁⲕⲉ ⲧⲟⲧⲉ ⲁϥⲙⲉⲉⲩⲉ <text:line-break/><text:span text:style-name="T1"> </text:span><text:span text:style-name="T2">(100/33) </text:span> ϫⲉ̣ ⲛ̣̅[ⲧⲟϥ ⲟ]ⲩ̣ⲁⲁⲧϥ’ ⲡⲉⲧϣⲟⲟⲡ’ ⲡⲉϥⲙⲉ‐ <text:line-break/><text:span text:style-name="T1"> </text:span><text:span text:style-name="T2">(100/34) </text:span> [..... ⲁϥ]ϫⲱⲕ’ ⲉⲃⲟⲗ ϩⲓⲧⲙ̅ ⲡϣⲁϫⲉ ⲁϥ’ <text:line-break/><text:span text:style-name="T1"> </text:span><text:span text:style-name="T2">(101/1) </text:span> ⲟⲩⲱⲛϩ ⲉⲃ[ⲟⲗ] ⲛ̅ⲟⲩⲡⲛ̅ⲁ̅ ⲉϥⲛ̅ⲛⲁ ⲉϥⲛ̅ⲛⲏⲩ <text:line-break/><text:span text:style-name="T1"> </text:span><text:span text:style-name="T2">(101/2) </text:span> ϩⲓϫⲛ̅ ⲙ̅ⲙⲟⲟⲩ ⲛ̅ⲧⲁⲣⲉ ⲡⲡⲛ̅ⲁ̅ ⲇⲉ ⲉⲧⲙ̅ⲙⲁⲩ <text:line-break/><text:span text:style-name="T1"> </text:span><text:span text:style-name="T2">(101/3) </text:span> ⲟⲩⲱⲛϩ ⲉⲃⲟⲗ’ ⲁⲡⲁⲣⲭⲱⲛ ⲡⲱⲣϫ’ ⲛ̅ⲧⲟⲩⲥⲓⲁ <text:line-break/><text:span text:style-name="T1"> </text:span><text:span text:style-name="T2">(101/4) </text:span> ⲙ̅ⲙⲟⲟⲩ ⲁⲩⲙⲉⲣⲟⲥ ⲁⲩⲱ ⲡⲉⲧϣⲟⲩⲱⲟⲩ <text:line-break/><text:span text:style-name="T1"> </text:span><text:span text:style-name="T2">(101/5) </text:span> ⲁⲩⲡⲟⲣϫϥ’ ⲁⲕⲉⲙⲉⲣⲟⲥ ⲁⲩⲱ ⲉⲃⲟⲗ ϩⲛ̅ ⲑⲩ‐ <text:line-break/><text:span text:style-name="T1"> </text:span><text:span text:style-name="T2">(101/6) </text:span> ⲗⲏ ⲁϥⲧⲁⲙⲓⲟ ⲛⲁϥ’ ⲛ̅ⲟⲩⲙⲁ ⲛ̅ϣⲱⲡⲉ ⲁϥⲙⲟⲩ‐ <text:line-break/><text:span text:style-name="T1"> </text:span><text:span text:style-name="T2">(101/7) </text:span> ⲧⲉ ⲉⲣⲟϥ ϫⲉ ⲧⲡⲉ ⲁⲩⲱ ⲉⲃⲟⲗ ϩⲛ̅ ⲑⲩⲗⲏ ⲁ’‐ <text:line-break/><text:span text:style-name="T1"> </text:span><text:span text:style-name="T2">(101/8) </text:span> ⲡⲁⲣⲭⲱⲛ ⲧⲁⲙⲓⲟ ⲛ̅ⲟⲩϩⲩⲡⲟⲡⲟⲇⲓⲟⲛ <text:line-break/><text:span text:style-name="T1"> </text:span><text:span text:style-name="T2">(101/9) </text:span> ⲁϥⲙⲟⲩⲧⲉ ⲉⲣⲟϥ’ ϫⲉ ⲡⲕⲁϩ §ⲙ̅⟦ⲛ⟧ⲙⲛ̅ⲛ̅ⲥⲱⲥ <text:line-break/><text:span text:style-name="T1"> </text:span><text:span text:style-name="T2">(101/10) </text:span> ⲁⲡⲁⲣⲭⲱⲛ’ ⲙⲉⲉⲩⲉ ϩⲛ̅ ⲧⲉϥ’ⲫⲩⲥⲓⲥ ⲁϥⲧⲁ‐ <text:line-break/><text:span text:style-name="T1"> </text:span><text:span text:style-name="T2">(101/11) </text:span> ⲙⲓⲟ ⲉⲃⲟⲗ’ ϩⲓⲧⲙ̅ ⲡϣⲁϫⲉ ⲛ̅ⲛⲟⲩϩⲟⲩⲧⲥϩⲓ‐ <text:line-break/><text:span text:style-name="T1"> </text:span><text:span text:style-name="T2">(101/12) </text:span> ⲙⲉ ⲁϥⲟⲩⲱⲛ ⲛ̅ⲧⲉϥⲧⲁⲡⲣⲟ ⲁϥϫⲟⲩϫⲟⲩ ⲉ‐ <text:line-break/><text:span text:style-name="T1"> </text:span><text:span text:style-name="T2">(101/13) </text:span> ⲣⲟϥ’ ⲛ̅ⲧⲁⲣⲟⲩⲟⲩⲱⲛ ⲛ̅ⲛⲉϥⲃⲁⲗ ⲁϥⲛⲁⲩ <text:line-break/><text:span text:style-name="T1"> </text:span><text:span text:style-name="T2">(101/14) </text:span> ⲁⲡⲉϥ’ⲉⲓⲱⲧ’ ⲁⲩⲱ ⲡⲉϫⲁϥ ⲛⲁϥ ϫⲉ ⲓ̈ ⲁⲡⲉϥ’‐ <text:line-break/><text:span text:style-name="T1"> </text:span><text:span text:style-name="T2">(101/15) </text:span> ⲉⲓⲱⲧ ⲇⲉ ⲙⲟⲩⲧⲉ ⲉⲣⲟϥ ϫⲉ ⲓ̅̈̅ⲁ̣̅̅ⲱ̅ ⲡⲁⲗⲓⲛ ⲁϥ’‐ <text:line-break/><text:span text:style-name="T1"> </text:span><text:span text:style-name="T2">(101/16) </text:span> ⲧⲁⲙⲓⲟ ⲡⲙⲁϩⲥⲛⲁⲩ ⲛ̅ϣⲏⲣⲉ ⲁϥϫⲟⲩϫⲟⲩ <text:line-break/><text:span text:style-name="T1"> </text:span><text:span text:style-name="T2">(101/17) </text:span> ⲉⲣⲟϥ ⲁϥⲟⲩⲱⲛ ⲛ̅ⲛⲉϥⲃⲁⲗ ⲁϥϫⲟⲟⲥ ⲙ̅‐ <text:line-break/><text:span text:style-name="T1"> </text:span><text:span text:style-name="T2">(101/18) </text:span> ⲡⲉϥⲉⲓⲱⲧ ϫⲉ ⟦ⲁ⟧ ⲉ’ ⲁⲡⲉϥⲉⲓⲱⲧ ⲙⲟⲩⲧⲉ <text:line-break/><text:span text:style-name="T1"> </text:span><text:span text:style-name="T2">(101/19) </text:span> ⲉⲣⲟϥ’ ϫⲉ ⲉⲗ̅ⲱ̅ⲁ̅ⲓ̅ ⲡⲁⲗⲓⲛ ⲁϥⲧⲁⲙⲓⲟ ⲙ̅‐ <text:line-break/><text:span text:style-name="T1"> </text:span><text:span text:style-name="T2">(101/20) </text:span> ⲡⲙⲁϩϣⲟⲙⲧ’ ⲛ̅ϣⲏⲣⲉ ⲁϥϫⲟⲩϫⲟⲩ ⲉⲣⲟϥ ⲁϥⲟⲩⲱⲛ ⲛ̅ⲛⲉϥ‐ <text:line-break/><text:span text:style-name="T1"> </text:span><text:span text:style-name="T2">(101/21) </text:span> ⲃⲁⲗ’ ⲁϥϫⲟⲟⲥ ⲙ̅ⲡⲉϥⲉⲓⲱⲧ ϫⲉ ⲁⲥ ⲁⲡⲉϥ‐ <text:line-break/><text:span text:style-name="T1"> </text:span><text:span text:style-name="T2">(101/22) </text:span> ⲉⲓⲱⲧ’ ⲙⲟⲩⲧⲉ ⲉⲣⲟϥ ϫⲉ ⲁⲥⲧⲁⲫⲁⲓⲟⲥ ⲛⲁ‐ <text:line-break/><text:span text:style-name="T1"> </text:span><text:span text:style-name="T2">(101/23) </text:span> ⲉⲓ ⲛⲉ ⲡϣⲟⲙⲧ ⲛ̅ϣⲏⲣⲉ ⲙ̅ⲡⲟⲩⲉⲓⲱⲧ’ §ⲁ‐ <text:line-break/><text:span text:style-name="T1"> </text:span><text:span text:style-name="T2">(101/24) </text:span> ⲥⲟϣϥ’ ⲟⲩⲱⲛϩ ⲉⲃⲟⲗ ϩⲙ̅ ⲡⲭⲁⲟⲥ ⲛ̅ϩⲟⲩⲧ’‐ <text:line-break/><text:span text:style-name="T1"> </text:span><text:span text:style-name="T2">(101/25) </text:span> ⲥϩⲓⲙⲉ ⲟⲩⲛ̅ⲧⲁⲩ ⲙ̅ⲙⲁⲩ ⲙ̅ⲡⲟⲩⲣⲁⲛ ⲛ̅ϩⲟ‐ <text:line-break/><text:span text:style-name="T1"> </text:span><text:span text:style-name="T2">(101/26) </text:span> ⲟⲩⲧ’ ⲙⲛ̅ ⲡⲟⲩⲣⲁⲛ ⲛ̅ⲥϩⲓⲙⲉ † ⲡⲣⲁⲛ ⲛ̅ⲥϩⲓⲙⲉ † <text:line-break/><text:span text:style-name="T1"> </text:span><text:span text:style-name="T2">(101/27) </text:span> ⲡⲉ ⲧⲡⲣⲟⲛⲟⲓⲁ ⲥⲁⲙⲃⲁⲑⲁⲥ ⲉⲧⲉ ⲑⲉⲃⲇⲟ‐ <text:line-break/><text:span text:style-name="T1"> </text:span><text:span text:style-name="T2">(101/28) </text:span> ⲙⲁⲥ ⲧⲉ ⲡⲉϥ’ϣⲏⲣⲉ ⲇⲉ ⲉⲩⲙⲟⲩⲧⲉ ⲉⲣⲟϥ’ <text:line-break/><text:span text:style-name="T1"> </text:span><text:span text:style-name="T2">(101/29) </text:span> ϫⲉ ⲓ̅̈̅ⲁ̅ⲱ̅ ⲡⲉϥⲣⲁⲛ ⲛ̅ⲥϩⲓⲙⲉ ⲧⲉ ⲧⲙ̅ⲛ̅ⲧϫⲁⲉⲓⲥ <text:line-break/><text:span text:style-name="T1"> </text:span><text:span text:style-name="T2">(101/30) </text:span> ⲥⲁⲃ̅ⲁ̅ⲱ̅ⲑ̅ ⲡⲉϥⲣⲁⲛ ⲛ̅ⲥϩⲓⲙⲉ ⲧⲉ ⲧⲙⲛⲧⲛⲟⲩ‐ <text:line-break/><text:span text:style-name="T1"> </text:span><text:span text:style-name="T2">(101/31) </text:span> ⲧⲉ ⲁⲇⲱⲛⲁⲓⲟⲥ ⲡⲉϥⲣⲁⲛ ⲛ̅ⲥϩⲓⲙⲉ ⲧⲉ ⲧⲙ̅ⲛ̅ⲧ̅‐ <text:line-break/><text:soft-page-break/><text:span text:style-name="T1"> </text:span><text:span text:style-name="T2">(101/32) </text:span> ⲣ̅ⲣⲟ ⲉⲗⲱⲁⲓⲟⲥ ⲡⲉϥⲣⲁⲛ ⲛ̅ⲥϩ[ⲓ]ⲙⲉ ⲡⲉ ⲡⲕⲱϩ <text:line-break/><text:span text:style-name="T1"> </text:span><text:span text:style-name="T2">(101/33) </text:span> ⲱⲣⲁⲓⲟⲥ ⲡⲉϥⲣⲁⲛ ⲛ̅ⲥϩⲓⲙⲉ ⲧⲉ̣ [ⲧⲙⲛ̅ⲧ]ⲣ̣ⲙ̣̅‐ <text:line-break/><text:span text:style-name="T1"> </text:span><text:span text:style-name="T2">(101/34) </text:span> ⲙⲁⲟ ⲁⲥⲧⲁⲫⲁⲓⲟⲥ ⲇⲉ ⲡⲉϥⲣⲁ[ⲛ ⲛ̅ⲥϩⲓⲙⲉ] <text:line-break/><text:span text:style-name="T1"> </text:span><text:span text:style-name="T2">(102/1) </text:span> ⲧ̣ⲉ ⲧⲥⲟⲫⲓⲁ ⲛⲁⲉ̣[ⲓ ⲛⲉ ⲧ]ⲥⲟ[ϣϥⲉ] ⲛ̣̅ⲇⲩⲛⲁ‐ <text:line-break/><text:span text:style-name="T1"> </text:span><text:span text:style-name="T2">(102/2) </text:span> ⲙⲓⲥ ⲛ̅ⲧⲥⲟϣϥⲉ ⲙ̅ⲡⲉ ⲙ̅ⲡ[ⲭⲁ]ⲟⲥ §ⲁⲩϣⲱ‐ <text:line-break/><text:span text:style-name="T1"> </text:span><text:span text:style-name="T2">(102/3) </text:span> ⲡⲉ ⲇⲉ ⲛ̅ϩⲟⲩⲧⲥϩⲓⲙⲉ ⲁⲡⲧⲩⲡⲟⲥ ⲛ̅ⲁⲑⲁ‐ <text:line-break/><text:span text:style-name="T1"> </text:span><text:span text:style-name="T2">(102/4) </text:span> ⲛⲁⲧⲟⲥ ⲉⲧϣⲟⲟⲡ’ ϩⲓ ⲧⲟⲩⲉϩⲏ ⲕⲁⲧⲁ ⲡⲟⲩ‐ <text:line-break/><text:span text:style-name="T1"> </text:span><text:span text:style-name="T2">(102/5) </text:span> ⲱϣ ⲛ̅ⲧⲡⲓⲥⲧⲓⲥ ϫⲉⲕⲁⲁⲥ ⲡⲉⲓⲛⲉ ⲙ̅ⲡⲉⲧ’‐ <text:line-break/><text:span text:style-name="T1"> </text:span><text:span text:style-name="T2">(102/6) </text:span> ϣⲟⲟⲡ ϫⲓⲛ’ ⲛ̅ϣⲟⲣⲡ’ ⲉϥⲛⲁⲁⲣⲭⲉⲓ ϣⲁ <text:line-break/><text:span text:style-name="T1"> </text:span><text:span text:style-name="T2">(102/7) </text:span> ⲛⲁⲣⲏϫϥ̅’ §ⲕⲛⲁϩⲉ ⲁⲧⲉⲛⲉⲣⲅⲓⲁ ⲛ̅ⲛⲉⲉⲓⲣⲁⲛ <text:line-break/><text:span text:style-name="T1"> </text:span><text:span text:style-name="T2">(102/8) </text:span> ⲙⲛ̅ ⲧⲇⲩⲛⲁⲙⲓⲥ ⲛ̅ⲛ̅ϩⲟⲟⲩⲧ’ ϩⲛ̅ ⲧⲁⲣⲭⲁⲅ’‐ <text:line-break/><text:span text:style-name="T1"> </text:span><text:span text:style-name="T2">(102/9) </text:span> ⲅⲉⲗⲓⲕⲏ ⲙ̅ⲙⲱⲩ̈ⲥⲏⲥ ⲡⲉⲡⲣⲟⲫⲏⲧⲏⲥ ⲛ̅‐ <text:line-break/><text:span text:style-name="T1"> </text:span><text:span text:style-name="T2">(102/10) </text:span> ⲣⲁⲛ ⲇⲉ ⲛ̅ⲛⲉϩⲓⲟⲙⲉ ϩⲛ̅ ⲧϣⲟⲣⲡ’ ⲛ̅ⲃⲓⲃⲗⲟⲥ <text:line-break/><text:span text:style-name="T1"> </text:span><text:span text:style-name="T2">(102/11) </text:span> ⲛ̅ⲛⲱⲣⲁⲓⲁⲥ’ §ⲡⲁⲣⲭⲓⲅⲉⲛⲏⲧⲱⲣ’ ⲇⲉ ⲓ̅̈̅ⲁ̅ⲗ̅ⲇ̅ⲁ̅‐ <text:line-break/><text:span text:style-name="T1"> </text:span><text:span text:style-name="T2">(102/12) </text:span> ⲃ̅ⲁ̅ⲱ̅ⲑ̅ ⲉⲩⲛ̅ⲧⲁϥ ϩⲛ̅ⲛⲟϭ ⲛ̅ⲉⲝⲟⲩⲥⲓⲁ ⲁϥ’‐ <text:line-break/><text:span text:style-name="T1"> </text:span><text:span text:style-name="T2">(102/13) </text:span> ⲧⲁⲙⲓⲟ ⲛ̅ϩⲙ̅ⲡⲏⲩⲉ ⲙ̅ⲡⲟⲩⲁ ⲡⲟⲩⲁ ⲛ̅ⲛⲉϥ’‐ <text:line-break/><text:span text:style-name="T1"> </text:span><text:span text:style-name="T2">(102/14) </text:span> ϣⲏⲣⲉ ϩⲓⲧⲙ̅ ⲡϣⲁϫⲉ ⲉⲛⲉⲥⲱⲟⲩ ⲙ̅ⲙⲁⲛ̅‐ <text:line-break/><text:span text:style-name="T1"> </text:span><text:span text:style-name="T2">(102/15) </text:span> ϣⲱⲡⲉ ⲁⲩⲱ ⲕⲁⲧⲁ ⲡⲉ ϩⲛ̅ⲛⲟϭ ⲛ̅ⲉⲟⲟⲩ ⲉⲩ‐ <text:line-break/><text:span text:style-name="T1"> </text:span><text:span text:style-name="T2">(102/16) </text:span> ⲥⲟⲧⲡ’ ⲛ̅ⲥⲟϣϥ’ ⲛ̅ⲕⲱⲃ ϩⲛ̅ⲑⲣⲟⲛⲟⲥ ⲙⲛ̅ <text:line-break/><text:span text:style-name="T1"> </text:span><text:span text:style-name="T2">(102/17) </text:span> ϩⲙ̅ⲙⲁ ⲛ̅ϣⲱⲡⲉ ⲙⲛ̅ ϩⲛ̅ⲣ̅ⲡⲏⲩⲉ ⲁⲩⲱ ϩⲛ̅‐ <text:line-break/><text:span text:style-name="T1"> </text:span><text:span text:style-name="T2">(102/18) </text:span> ϩⲁⲣⲙⲁ ⲁⲩⲱ ϩⲙ̅ⲡⲁⲣⲑⲉⲛⲟⲥ ⲙ̅ⲡⲛ̅ⲁ̅ † ⲉϩⲣⲁⲓ̈ <text:line-break/><text:span text:style-name="T1"> </text:span><text:span text:style-name="T2">(102/19) </text:span> ⲁⲩⲁϩⲟⲣⲁⲧⲟⲛ’ † ⲙⲛ̅ ⲛⲟⲩⲉⲟⲟⲩ ⲡⲟⲩⲁ ⲡⲟⲩⲁ <text:line-break/><text:span text:style-name="T1"> </text:span><text:span text:style-name="T2">(102/20) </text:span> ⲟⲩⲛ̅ⲧⲁϥⲥⲉ ϩⲛ̅ ⲧⲉϥⲡⲉ ϩⲛ̅ⲥⲧⲣⲁⲧⲉⲩⲙⲁ ⲛ̅‐ <text:line-break/><text:span text:style-name="T1"> </text:span><text:span text:style-name="T2">(102/21) </text:span> ⲇⲩⲛⲁⲙⲓⲥ ⲛ̅ⲛⲟⲩⲧⲉ ϩⲓ ϫⲟⲉⲓⲥ ϩⲓ ⲁⲅ’ⲅⲉⲗⲟⲥ <text:line-break/><text:span text:style-name="T1"> </text:span><text:span text:style-name="T2">(102/22) </text:span> ϩⲓ ⲁⲣⲭⲁⲅ’ⲅⲉⲗⲟⲥ ϩⲛ̅ⲧⲃⲁ ⲉⲙⲛ̅ⲧⲁⲩ ⲏⲡⲉ ⲁ’‐ <text:line-break/><text:span text:style-name="T1"> </text:span><text:span text:style-name="T2">(102/23) </text:span> ⲧⲣⲟⲩⲣ̅ϩⲩⲡⲏⲣⲉⲧⲉⲓ §ϫⲓⲥⲧⲟⲣⲓⲁ ⲛ̅ⲛⲁⲉⲓ ⲕⲛⲁ‐ <text:line-break/><text:span text:style-name="T1"> </text:span><text:span text:style-name="T2">(102/24) </text:span> ϩⲉ ⲉⲣⲟⲥ ⲁⲕⲣⲓⲃⲱⲥ ϩⲙ̅ ⲡϣⲟⲣⲡ’ ⲛ̅ⲗⲟⲅⲟⲥ <text:line-break/><text:span text:style-name="T1"> </text:span><text:span text:style-name="T2">(102/25) </text:span> ⲛ̅ⲱⲣⲁⲓⲁⲥ §ⲁⲩϫⲟⲕⲟⲩ ⲇⲉ ⲉⲃⲟⲗ ϩⲛ̅ ϯⲡⲉ ϣⲁ‐ <text:line-break/><text:span text:style-name="T1"> </text:span><text:span text:style-name="T2">(102/26) </text:span> ϩⲣⲁⲓ̈ ⲉⲧⲙⲉϩⲥⲟⲉ ⲙ̅ⲡⲉ ⲧⲁ ⲧⲥⲟⲫⲓⲁ §ⲁⲩ‐ <text:line-break/><text:span text:style-name="T1"> </text:span><text:span text:style-name="T2">(102/27) </text:span> ϣⲟⲣϣⲣ̅ ⲛ̅ⲧⲡⲉ ⲙⲛ̅ ⲡⲉϥⲕⲁϩ ⲉⲃⲟⲗ ϩⲓⲧⲛ̅ <text:line-break/><text:span text:style-name="T1"> </text:span><text:span text:style-name="T2">(102/28) </text:span> ⲡⲉⲧϣⲧⲟⲣⲧⲣ̅ ⲉⲧⲙ̅ⲡⲓⲧⲛ̅ ⲙ̅ⲙⲁⲩ ⲧⲏⲣⲟⲩ <text:line-break/><text:span text:style-name="T1"> </text:span><text:span text:style-name="T2">(102/29) </text:span> ⲁⲩⲱ ⲁⲧⲥⲟⲉ ⲙ̅ⲡⲉ ⲛⲟⲉⲓⲛ ⲛⲉⲥⲉⲥⲟⲟⲩⲛ <text:line-break/><text:span text:style-name="T1"> </text:span><text:span text:style-name="T2">(102/30) </text:span> ⲅⲁⲣ’ ⲛ̅ϭⲓ ⲛ̅ⲇⲩⲛⲁⲙⲓⲥ ⲙ̅ⲡⲭⲁⲟⲥ ϫⲉ ⲛⲓⲙ ⲡⲉⲛ‐ <text:line-break/><text:span text:style-name="T1"> </text:span><text:span text:style-name="T2">(102/31) </text:span> ⲧⲁϩⲧⲁⲕⲟ ⲛ̅ⲧⲡⲉ ⲉⲧⲙ̅ⲡⲓⲧⲛ̅ ⲙ̅ⲙⲟⲟⲩ ⲛ̅‐ <text:line-break/><text:span text:style-name="T1"> </text:span><text:span text:style-name="T2">(102/32) </text:span> ⲧⲁⲣⲉⲥⲉⲓⲙⲉ ⲇⲉ ⲛ̅ϭⲓ ⲧⲡⲓⲥⲧⲓⲥ ⲁⲡϣⲱϣϥ <text:line-break/><text:span text:style-name="T1"> </text:span><text:span text:style-name="T2">(102/33) </text:span> ⲙ̅ⲡⲉϣ̣ⲧⲟ̣ⲣⲧⲣ̅ ⲁⲥϫⲟⲟⲩ ⲙ̅ⲡⲉⲥⲛⲓϥⲉ ⲁⲥ‐ <text:line-break/><text:span text:style-name="T1"> </text:span><text:span text:style-name="T2">(102/34) </text:span> ⲙ̣[ⲟⲣϥ’ ⲁⲥ]ⲛⲟϫϥ’ ⲉⲡⲓⲧⲛ̅ ⲉⲡⲧⲁⲣⲧⲁⲣⲟⲛ <text:line-break/><text:span text:style-name="T1"> </text:span><text:span text:style-name="T2">(102/35) </text:span> [ϫⲓⲙ’ ⲫⲟⲟ]ⲩ ⲉⲧⲙ̅ⲙⲁⲩ ⲁⲧⲡⲉ ⲥⲙⲛⲧⲥ̅ ⲙⲛ̅ <text:line-break/><text:span text:style-name="T1"> </text:span><text:span text:style-name="T2">(103/1) </text:span> ⲡⲉⲥⲕⲁϩ ⲉⲃ[ⲟⲗ] ϩⲓⲧⲛ̅ ⲧⲥⲟⲫⲓⲁ ⲛ̅ⲓⲁ̅ⲗ̅ⲇ̅ⲁ̅ⲃ̅ⲁ̅‐ <text:line-break/><text:span text:style-name="T1"> </text:span><text:span text:style-name="T2">(103/2) </text:span> ⲱ̅ⲑ̅’̅ ⲧⲉⲧⲙ̅ⲡⲓⲧⲛ̅ ⲙ̅ⲙⲟⲟⲩ ⲧⲏⲣⲟⲩ §ⲛ̅ⲧⲁ‐ <text:line-break/><text:span text:style-name="T1"> </text:span><text:span text:style-name="T2">(103/3) </text:span> ⲣⲉ ⲙ̅ⲡⲏⲩⲉ ⲇⲉ ⲥⲙⲛ̅ⲧⲟⲩ ⲙⲛ̅ ⲛⲟⲩϭⲟⲙ’ <text:line-break/><text:span text:style-name="T1"> </text:span><text:span text:style-name="T2">(103/4) </text:span> ⲙⲛ̅ ⲧⲟⲩⲇⲓⲟⲓⲕⲏⲥⲓⲥ ⲧⲏⲣⲥ̅ ⲁⲡⲁⲣⲭⲓⲅⲉⲛⲉ‐ <text:line-break/><text:span text:style-name="T1"> </text:span><text:span text:style-name="T2">(103/5) </text:span> ⲧⲱⲣ ϫⲓⲥⲉ ⲙ̅ⲙⲟϥ’ ⲁⲩⲱ ⲁϥϫⲓ ⲉⲟⲟⲩ ϩⲓⲧⲛ̅ <text:line-break/><text:span text:style-name="T1"> </text:span><text:span text:style-name="T2">(103/6) </text:span> 〈ⲧ〉ⲥⲧⲣⲁⲧⲉⲓⲁ ⲧⲏⲣⲥ̅ ⲛ̅ⲛ̅ⲁⲅⲅⲉⲗⲟⲥ ⲁⲩⲱ † ⲛ̅ⲛⲟⲩ‐ <text:line-break/><text:span text:style-name="T1"> </text:span><text:span text:style-name="T2">(103/7) </text:span> ⲛⲉ ⲧⲏⲣⲟⲩ ⲙⲛ̅ ⲛⲟⲩⲁⲅ’ⲅⲉⲗⲟⲥ ⲟⲩⲥⲙⲟⲩ <text:line-break/><text:span text:style-name="T1"> </text:span><text:span text:style-name="T2">(103/8) </text:span> ⲙⲛ̅ⲛⲟⲩⲉⲟⲟⲩ ⲁⲩⲧⲁⲁϥ ⲛⲁϥ’ ⲛ̅ⲧⲟϥ ⲇⲉ ⲁϥ‐ <text:line-break/><text:span text:style-name="T1"> </text:span><text:span text:style-name="T2">(103/9) </text:span> ⲟⲩⲛⲟϥ’ ϩⲙ̅ ⲡⲉϥϩⲏⲧ’ ⲁⲩⲱ ⲁϥϣⲟⲩϣⲟⲩ <text:line-break/><text:soft-page-break/><text:span text:style-name="T1"> </text:span><text:span text:style-name="T2">(103/10) </text:span> ⲙ̅ⲙⲟϥ ⲛ̅ⲛⲁⲩ ⲛⲓⲙ ⲉϥϫⲱ ⲙ̅ⲙⲟⲥ ⲛⲁⲩ’ <text:line-break/><text:span text:style-name="T1"> </text:span><text:span text:style-name="T2">(103/11) </text:span> ϫⲉ ϯⲣ̅ ⲭⲣⲉⲓⲁ ⲁⲛ ⲗ̅ⲗⲁⲁⲩ ⲡⲉϫⲁϥ ϫⲉ ⲁ‐ <text:line-break/><text:span text:style-name="T1"> </text:span><text:span text:style-name="T2">(103/12) </text:span> ⲛⲟⲕ’ ⲡⲉ ⲡⲛⲟⲩⲧⲉ ⲁⲩⲱ ⲙⲛ̅ ⲕⲉⲟⲩⲁ ϣⲟⲟⲡ’ <text:line-break/><text:span text:style-name="T1"> </text:span><text:span text:style-name="T2">(103/13) </text:span> ⲁϫⲛⲧ’ §ⲛ̅ⲧⲁⲣⲉϥϫⲉ ⲛⲁⲉⲓ ⲇⲉ ⲁϥⲣ̅ ⲛⲟⲃⲉ ⲁ‐ <text:line-break/><text:span text:style-name="T1"> </text:span><text:span text:style-name="T2">(103/14) </text:span> ⲛⲁⲧⲙⲟⲩ ⲧⲏⲣⲟⲩ ⲉⲧϫⲉ ⲟⲩⲱ ⲁⲩⲱ ⲁⲩⲁ‐ <text:line-break/><text:span text:style-name="T1"> </text:span><text:span text:style-name="T2">(103/15) </text:span> ⲣⲏϩ ⲛⲁϥ’ ⲛ̅ⲧⲁⲣⲉ ⲧⲡⲓⲥⲧⲓⲥ ϭⲉ ⲛⲁⲩ ⲁⲧⲙⲛⲧ̅‐ <text:line-break/><text:span text:style-name="T1"> </text:span><text:span text:style-name="T2">(103/16) </text:span> ⲁⲥⲉⲃⲏⲥ ⲙ̅ⲡⲛⲟϭ ⲛ̅ⲁⲣⲭⲱⲛ ⲁⲥⲃⲱⲗⲕ’ <text:line-break/><text:span text:style-name="T1"> </text:span><text:span text:style-name="T2">(103/17) </text:span> ⲛⲉⲩⲛⲁⲩ ⲁⲛ’ ⲉⲣⲟⲥ ⲡⲉϫⲁⲥ ϫⲉ ⲕⲣ̅ⲡⲗⲁⲛⲁ <text:line-break/><text:span text:style-name="T1"> </text:span><text:span text:style-name="T2">(103/18) </text:span> ⲥⲁⲙⲁⲏⲗ’ ⲉⲧⲉ ⲡⲁⲉⲓ ⲡⲉ ⲡⲛⲟⲩⲧⲉ ⲃ̅ⲃ̅ⲗⲗⲉ <text:line-break/><text:span text:style-name="T1"> </text:span><text:span text:style-name="T2">(103/19) </text:span> ⲟⲩⲛ̅ ⲟⲩⲣⲱⲙⲉ ⲛ̅ⲁⲑⲁⲛⲁⲧⲟⲥ ⲣ̅ⲣⲙ̅ⲟⲩⲟⲉⲓⲛ <text:line-break/><text:span text:style-name="T1"> </text:span><text:span text:style-name="T2">(103/20) </text:span> ϣⲟⲟⲡ’ ϩⲓ ⲧⲉⲕϩⲏ ⲡⲁⲉⲓ ⲉⲧⲛⲁⲟⲩⲱⲛϩ ⲉⲃⲟⲗ <text:line-break/><text:span text:style-name="T1"> </text:span><text:span text:style-name="T2">(103/21) </text:span> ϩⲛ̅ ⲛⲉⲧⲙ̅ⲡⲗⲁⲥⲙⲁ ϥⲛⲁⲣ̅ⲕⲁⲧⲁⲡⲁⲧⲉⲓ ⲙ̅‐ <text:line-break/><text:span text:style-name="T1"> </text:span><text:span text:style-name="T2">(103/22) </text:span> ⲙⲟⲕ ⲛ̅ⲑⲉ ⲛ̅ⲛⲓⲟⲙⲉ ⲛ̅ⲕⲉⲣⲁⲙⲉⲩⲥ ϣⲁⲩ‐ <text:line-break/><text:span text:style-name="T1"> </text:span><text:span text:style-name="T2">(103/23) </text:span> ⲥⲟⲙⲟⲩ ⲁⲩⲱ ⲕⲛⲁⲃⲱⲕ’ ⲙⲛ̅ ⲛⲉⲧⲉ ⲛⲟⲩⲕ’ <text:line-break/><text:span text:style-name="T1"> </text:span><text:span text:style-name="T2">(103/24) </text:span> ⲛⲉ ⲁⲡⲓⲧⲛ̅ ϣⲁ ⲧⲉⲕ’ⲙⲁⲁⲩ ⲡⲛⲟⲩⲛ ϩⲛ̅ <text:line-break/><text:span text:style-name="T1"> </text:span><text:span text:style-name="T2">(103/25) </text:span> ⲧⲥⲩⲛ’ⲧⲉⲗⲉⲓⲁ ⲅⲁⲣ ⲛ̅ⲛⲉⲧⲛ̅ϩⲃⲏⲩⲉ ⲥⲉ‐ <text:line-break/><text:span text:style-name="T1"> </text:span><text:span text:style-name="T2">(103/26) </text:span> ⲛⲁⲣ̅ⲕⲁⲧⲁⲗⲩⲉ ⲙ̅ⲡϣⲧⲁ ⲧⲏⲣϥ’ ⲛ̅ⲧⲁϥ’ⲟⲩ‐ <text:line-break/><text:span text:style-name="T1"> </text:span><text:span text:style-name="T2">(103/27) </text:span> ⲱⲛϩ ⲉⲃⲟⲗ ϩⲛ̅ ⲧⲙⲉ ⲁⲩⲱ ϥⲛⲁⲱϫⲛ̅ ⲛ̅ϥⲣ̅ <text:line-break/><text:span text:style-name="T1"> </text:span><text:span text:style-name="T2">(103/28) </text:span> ⲑⲉ ⲙ̅ⲡⲉⲧⲉ ⲙ̅ⲡⲉϥ’ϣⲱⲡⲉ §ⲛ̅ⲧⲁⲣⲉ ⲧⲡⲓ‐ <text:line-break/><text:span text:style-name="T1"> </text:span><text:span text:style-name="T2">(103/29) </text:span> ⲥⲧⲓⲥ ϫⲉ ⲛⲁⲉⲓ ⲁⲥϭⲱⲗⲡ’ ⲉⲃⲟⲗ ϩⲛ̅ⲛⲙ̅‐ <text:line-break/><text:span text:style-name="T1"> </text:span><text:span text:style-name="T2">(103/30) </text:span> ⲙⲟⲟⲩ ⲙ̅ⲡⲉⲥⲉⲓⲛⲉ ⲛ̅ⲧⲉⲥⲙⲛⲧⲛⲟϭ ⲁⲩ‐ <text:line-break/><text:span text:style-name="T1"> </text:span><text:span text:style-name="T2">(103/31) </text:span> ⲱ ⲛ̅ⲧⲉⲉⲓϩⲉ ⲁⲥⲣ̅ⲁⲛⲁⲭⲱⲣⲉⲓ ⲉϩⲣⲁⲓ̈ ⲉ‐ <text:line-break/><text:span text:style-name="T1"> </text:span><text:span text:style-name="T2">(103/32) </text:span> ⲡⲉⲥⲟⲩⲟⲉⲓⲛ §ⲥⲁⲃ̅ⲁ̅ⲱ̅ⲑ̅ ⲇⲉ ⲡϣⲏⲣⲉ <text:line-break/><text:span text:style-name="T1"> </text:span><text:span text:style-name="T2">(103/33) </text:span> ⲛ̅ⲓⲁⲗⲇⲁⲃ̅ⲁ̅ⲱ̅ⲑ̅ ⲛ̅ⲧⲁⲣⲉϥ’ⲥⲱⲧⲙ̅ ⲁ̣ⲧ’‐ <text:line-break/><text:span text:style-name="T1"> </text:span><text:span text:style-name="T2">(103/34) </text:span> ⲥⲙⲏ ⲛ̅ⲧⲡⲓⲥⲧⲓⲥ ⲁϥϩⲩⲙⲛⲉⲓ ⲉⲣⲟ[ⲥ ⲁϥⲣ̅]‐ <text:line-break/><text:span text:style-name="T1"> </text:span><text:span text:style-name="T2">(103/35) </text:span> ⲕⲁⲧⲁⲅⲉⲓⲛⲱⲥⲕⲉ ⲙ̅ⲡⲉⲓⲱⲧ [......] <text:line-break/><text:span text:style-name="T1"> </text:span><text:span text:style-name="T2">(104/1) </text:span> ⲉϫⲛ̅ ⲡϣⲁϫⲉ ⲛ̅ⲧⲡⲓⲥⲧⲓⲥ̣ [ⲁϥ]ϯ ⲉⲟⲟⲩ ⲛⲁⲥ <text:line-break/><text:span text:style-name="T1"> </text:span><text:span text:style-name="T2">(104/2) </text:span> ϫⲉ ⲁⲥⲧⲁⲙⲟⲟⲩ ⲁⲡⲣⲱⲙⲉ̣ ⲛ̣̅ⲁⲑⲁⲛⲁⲧⲟⲥ’ <text:line-break/><text:span text:style-name="T1"> </text:span><text:span text:style-name="T2">(104/3) </text:span> ⲙⲛ̅ ⲡⲉϥⲟⲩⲟⲉⲓⲛ ⲧⲡⲓⲥⲧⲓⲥ ⲇⲉ ⲧⲥⲟⲫⲓⲁ ⲁⲥ‐ <text:line-break/><text:span text:style-name="T1"> </text:span><text:span text:style-name="T2">(104/4) </text:span> ⲥⲱⲧ’ ⲙ̅ⲡⲉⲥⲧⲏⲏⲃⲉ † ⲉⲃⲟⲥ ⲁⲥⲡⲱϩⲧ ⲁϫⲱϥ’ <text:line-break/><text:span text:style-name="T1"> </text:span><text:span text:style-name="T2">(104/5) </text:span> ⲛ̅ⲟⲩⲟⲉⲓⲛ’ ⲉⲃⲟⲗ ϩⲙ̅ ⲡⲉⲥⲟⲩⲟⲉⲓⲛ ⲁⲩⲕⲁ‐ <text:line-break/><text:span text:style-name="T1"> </text:span><text:span text:style-name="T2">(104/6) </text:span> ⲧⲁⲕⲣⲓⲙⲁ ⲙ̅ⲡⲉϥ’ⲉⲓⲱⲧ’ ⲥⲁⲃⲁⲱⲑ’ ϭⲉ ⲛ̅ⲧⲁ’‐ <text:line-break/><text:span text:style-name="T1"> </text:span><text:span text:style-name="T2">(104/7) </text:span> ⲣⲉϥϫⲓ ⲟⲩⲟⲉⲓⲛ ⲁϥϫⲓ ⲟⲩⲛⲟϭ ⲛ̅ⲉⲝⲟⲩⲥⲓⲁ’ <text:line-break/><text:span text:style-name="T1"> </text:span><text:span text:style-name="T2">(104/8) </text:span> ⲉϩⲟⲩⲛ ⲉⲛⲇⲩⲛⲁⲙⲓⲥ ⲧⲏⲣⲟⲩ ⲙ̅ⲡⲭⲁⲟⲥ <text:line-break/><text:span text:style-name="T1"> </text:span><text:span text:style-name="T2">(104/9) </text:span> ϫⲓⲙ ⲡϩⲟⲟⲩ ⲉⲧⲙ̅ⲙⲁⲩ ⲁⲩⲙⲟⲩⲧⲉ ⲉⲣⲟϥ ϫⲉ <text:line-break/><text:span text:style-name="T1"> </text:span><text:span text:style-name="T2">(104/10) </text:span> ⲡϫⲟⲉⲓⲥ ⲛ̅ⲛ̅ϭⲟⲙ’ §ⲁϥⲙⲉⲥⲧⲉ ⲡⲉϥ’ⲉⲓⲱⲧ’ ⲡⲕⲁ‐ <text:line-break/><text:span text:style-name="T1"> </text:span><text:span text:style-name="T2">(104/11) </text:span> ⲕⲉ ⲁⲩⲱ ⲧⲉϥⲙⲁⲁⲩ ⲡⲛⲟⲩⲛ ⲁϥⲥⲓⲭⲁⲛⲉ ⲁ’‐ <text:line-break/><text:span text:style-name="T1"> </text:span><text:span text:style-name="T2">(104/12) </text:span> ⲧⲉϥ’ⲥⲱⲛⲉ ⲡⲙⲉⲉⲩⲉ ⲙ̅ⲡⲁⲣⲭⲓⲅⲉⲛⲏⲧⲱⲣ’ <text:line-break/><text:span text:style-name="T1"> </text:span><text:span text:style-name="T2">(104/13) </text:span> ⲡⲉⲧⲛ̅ⲛⲁ ⲉⲧⲛ̅ⲛⲏⲩ ϩⲓϫⲛ̅ ⲙ̅ⲙⲟⲟⲩ ⲉⲧⲃⲉ <text:line-break/><text:span text:style-name="T1"> </text:span><text:span text:style-name="T2">(104/14) </text:span> ⲡⲉϥ’ⲟⲩⲟⲉⲓⲛ ⲇⲉ ⲁⲛⲉⲝⲟⲩⲥⲓⲁ ⲧⲏⲣⲟⲩ ⲕⲱϩ <text:line-break/><text:span text:style-name="T1"> </text:span><text:span text:style-name="T2">(104/15) </text:span> ⲉⲣⲟϥ’ ⲛ̅ⲧⲉ ⲡⲭⲁⲟⲥ ⲁⲩⲱ ⲛ̅ⲧⲁⲣⲟⲩϣⲧⲟⲣⲧⲣ̅ <text:line-break/><text:span text:style-name="T1"> </text:span><text:span text:style-name="T2">(104/16) </text:span> ⲁⲩⲉⲓⲣⲉ ⲛ̅ⲟⲩⲛⲟϭ ⲙ̅ⲡⲟⲗⲉⲙⲟⲥ ϩⲛ̅ ⲧⲥⲁϣ‐ <text:line-break/><text:span text:style-name="T1"> </text:span><text:span text:style-name="T2">(104/17) </text:span> ϥⲉ ⲙ̅ⲡⲉ §ⲧⲟⲧⲉ ⲧⲡⲓⲥⲧⲓⲥ ⲧⲥⲟⲫⲓⲁ ⲛ̅ⲧⲁⲣⲉⲥ‐ <text:line-break/><text:span text:style-name="T1"> </text:span><text:span text:style-name="T2">(104/18) </text:span> ⲛⲁⲩ ⲁⲡⲡⲟⲗⲉⲙⲟⲥ ⲁⲥϫⲟⲟⲩ ⲛ̅ⲥⲁⲃⲁⲱⲑ’ <text:line-break/><text:span text:style-name="T1"> </text:span><text:span text:style-name="T2">(104/19) </text:span> ⲉⲃⲟⲗ ϩⲙ̅ ⲡⲉⲥⲟⲩⲟⲉⲓⲛ ⲛ̅ⲥⲁϣϥ ⲛ̅ⲁⲣⲭⲁⲅ’‐ <text:line-break/><text:span text:style-name="T1"> </text:span><text:span text:style-name="T2">(104/20) </text:span> ⲅⲉⲗⲟⲥ ⲁⲩⲧⲟⲣⲡϥ’ ⲉϩⲣⲁⲓ̈ ⲉⲧⲙⲁϩⲥⲁϣϥⲉ ⲙ̅‐ <text:line-break/><text:span text:style-name="T1"> </text:span><text:span text:style-name="T2">(104/21) </text:span> ⲡⲉ ⲁⲩⲱⲉϩⲣⲁⲧⲟⲩ ϩⲓ ⲧⲉϥϩⲏ’ ϩⲱⲥ ⲇⲓⲁⲕⲟ‐ <text:line-break/><text:soft-page-break/><text:span text:style-name="T1"> </text:span><text:span text:style-name="T2">(104/22) </text:span> ⲛⲟⲥ ⲡⲁⲗⲓⲛ ⲁⲥϫⲟⲟⲩ ⲛⲁϥ’ ⲛ̅ⲕⲉϣⲟⲙⲧ’ <text:line-break/><text:span text:style-name="T1"> </text:span><text:span text:style-name="T2">(104/23) </text:span> ⲛ̅ⲁⲣⲭⲁⲅ’ⲅⲉⲗⲟⲥ ⲁⲥⲥⲙⲛ̅ ⲧⲙⲛ̅ⲧⲉⲣⲟ ⲛⲁϥ’ <text:line-break/><text:span text:style-name="T1"> </text:span><text:span text:style-name="T2">(104/24) </text:span> ⲛ̅ⲧⲡⲉ ⲟⲩⲟⲛ ⲛⲓⲙ ϫⲉⲕⲁⲁⲥ ⲉϥⲛⲁϣⲱⲡⲉ <text:line-break/><text:span text:style-name="T1"> </text:span><text:span text:style-name="T2">(104/25) </text:span> ⲙ̅ⲡⲥⲁ ⲛϩⲣⲉ ⲙ̅ⲡⲙⲛⲧⲥⲛⲟⲟⲩⲥ ⲛ̅ⲛⲟⲩⲧⲉ <text:line-break/><text:span text:style-name="T1"> </text:span><text:span text:style-name="T2">(104/26) </text:span> ⲙ̅ⲡⲭⲁⲟⲥ §ⲛ̅ⲧⲁⲣⲉ ⲥⲁⲃⲁⲱⲑ ⲇⲉ ϫⲓ ⲡⲧⲟⲡⲟⲥ <text:line-break/><text:span text:style-name="T1"> </text:span><text:span text:style-name="T2">(104/27) </text:span> ⲛ̅ⲧⲁⲛⲁⲡⲁⲩⲥⲓⲥ ⲉⲡⲙⲁ ⲛ̅ⲧⲉϥⲙⲉⲧⲁⲛⲟⲓⲁ <text:line-break/><text:span text:style-name="T1"> </text:span><text:span text:style-name="T2">(104/28) </text:span> ⲉⲧⲓ ⲁⲧⲡⲓⲥⲧⲓⲥ ϯ ⲛⲁϥ’ ⲛ̅ⲧⲉⲥϣⲉⲉⲣⲉ ⲛ̅ⲍⲱⲏ <text:line-break/><text:span text:style-name="T1"> </text:span><text:span text:style-name="T2">(104/29) </text:span> ⲙⲛ̅ⲛⲟⲩⲛⲟϭ ⲛ̅ⲉⲝⲟⲩⲥⲓⲁ ϫⲉⲕⲁⲁⲥ ⲉⲥⲛⲁ‐ <text:line-break/><text:span text:style-name="T1"> </text:span><text:span text:style-name="T2">(104/30) </text:span> ⲧⲁⲙⲟϥ’ ⲁⲛⲉⲧϣⲟⲟⲡ’ ⲧⲏⲣⲟⲩ ϩⲛ̅ ⲧⲙⲁϩ <text:line-break/><text:span text:style-name="T1"> </text:span><text:span text:style-name="T2">(104/31) </text:span> ϣⲙⲟⲩⲛⲉ §ϩⲱⲥ ⲉⲩⲛ̅ⲧⲁϥ ⲇⲉ ⲛ̅ⲟⲩⲉⲝⲟⲩⲥⲓⲁ <text:line-break/><text:span text:style-name="T1"> </text:span><text:span text:style-name="T2">(104/32) </text:span> ⲁϥⲧⲁⲙⲓⲟ ⲛⲁϥ’ ⲛ̅ϣⲟⲣⲡ’ ⲛ̅ⲟⲩⲙⲁ ⲛ̅ϣⲱ‐ <text:line-break/><text:span text:style-name="T1"> </text:span><text:span text:style-name="T2">(104/33) </text:span> ⲡⲉ ⲟⲩⲛⲟϭ ⲡⲉ ⲉϥⲧⲁⲉⲓⲏⲩ ⲉⲙⲁⲧⲉ ⲉϥⲟ ⲛ̅ <text:line-break/><text:span text:style-name="T1"> </text:span><text:span text:style-name="T2">(104/34) </text:span> ⲥ̣ⲁ̣[ϣ]ϥ ⲛ̅ⲕⲱⲃ ⲡⲁⲣⲁ ⲛⲉⲧϣⲟⲟⲡ ⲧⲏⲣⲟⲩ <text:line-break/><text:span text:style-name="T1"> </text:span><text:span text:style-name="T2">(104/35) </text:span> [ϩⲛ̅ ⲧⲥ]ⲁ̣ϣ̣ϥⲉ ⲙ̅ⲡⲉ §ⲙ̅ⲡⲙ̅ⲧⲟ ⲇⲉ ⲉⲃⲟⲗ’ <text:line-break/><text:span text:style-name="T1"> </text:span><text:span text:style-name="T2">(105/1) </text:span> ⲙ̅ⲡⲉϥⲙⲁ ⲛ̅ϣⲱⲡⲉ ⲁϥⲧⲁⲙⲉⲓⲟ ⲛ̅ⲟⲩⲑⲣⲟ‐ <text:line-break/><text:span text:style-name="T1"> </text:span><text:span text:style-name="T2">(105/2) </text:span> ⲛⲟⲥ ⲉⲩⲛⲟϭ ⲡⲉ ⲉϥϩⲓϫⲛ̅ ⲟⲩϩⲁⲣⲙⲁ ⲉϥⲟ <text:line-break/><text:span text:style-name="T1"> </text:span><text:span text:style-name="T2">(105/3) </text:span> ⲛ̅ϥⲧⲟⲟⲩ ⲙ̅ⲡⲣⲟⲥⲱⲡⲟⲛ ⲉⲩⲙⲟⲩⲧⲉ ⲉⲣⲟϥ’ <text:line-break/><text:span text:style-name="T1"> </text:span><text:span text:style-name="T2">(105/4) </text:span> ϫⲉ ⲭⲉⲣⲟⲩⲃⲓⲛ ⲡⲭⲉⲣⲟⲩⲃⲓⲛ ⲇⲉ ⲟⲩⲛ̅ⲧⲁϥ’ <text:line-break/><text:span text:style-name="T1"> </text:span><text:span text:style-name="T2">(105/5) </text:span> ⲙ̅ⲙⲁⲩ ⲛ̅ϣⲙⲟⲩⲛⲉ ⲙ̅ⲙⲟⲣⲫⲏ ⲕⲁⲧⲁ ⲡϥ’‐ <text:line-break/><text:span text:style-name="T1"> </text:span><text:span text:style-name="T2">(105/6) </text:span> ⲧⲟⲩⲕⲟⲟϩ ϩⲙ̅ⲙⲟⲣⲫⲏ ⲙ̅ⲙⲟⲩⲉⲓ ⲁⲩⲱ ϩⲙ̅‐ <text:line-break/><text:span text:style-name="T1"> </text:span><text:span text:style-name="T2">(105/7) </text:span> ⲙⲟⲣⲫⲏ ⲙ̅ⲙⲁⲥⲉ ⲁⲩⲱ ϩⲙ̅ⲙⲟⲣⲫⲏ ⲣⲣⲱ‐ <text:line-break/><text:span text:style-name="T1"> </text:span><text:span text:style-name="T2">(105/8) </text:span> ⲙⲉ ⲙⲛ ϩⲙ̅ⲙⲟⲣⲫⲏ ⲛ̅ⲁⲉⲧⲟⲥ ϩⲱⲥⲧⲉ ⲙ̅ⲙⲟⲣ‐ <text:line-break/><text:span text:style-name="T1"> </text:span><text:span text:style-name="T2">(105/9) </text:span> ⲫⲏ ⲧⲏⲣⲟⲩ ⲥⲉⲉⲓⲣⲉ ⲛ̅ⲥⲉⲧⲁϥⲧⲉ ⲙ̅ⲙⲟⲣⲫⲏ <text:line-break/><text:span text:style-name="T1"> </text:span><text:span text:style-name="T2">(105/10) </text:span> ⲁⲩⲱ ⲥⲁϣϥ̅ ⲛ̅ⲁⲣⲭⲁⲅⲅⲉⲗⲟⲥ ⲉⲩⲁϩⲉⲣⲁⲧⲟⲩ <text:line-break/><text:span text:style-name="T1"> </text:span><text:span text:style-name="T2">(105/11) </text:span> ϩⲓ ⲧⲉϥϩⲏ ⲛ̅ⲧⲟϥ ⲡⲉ ⲡⲙⲁϩϣⲙⲟⲩⲛ ⲉⲩⲛ̅‐ <text:line-break/><text:span text:style-name="T1"> </text:span><text:span text:style-name="T2">(105/12) </text:span> ⲧⲁϥ’ ⲉⲝⲟⲩⲥⲓⲁ ⲙ̅ⲙⲟⲣⲫⲏ ⲧⲏⲣⲟⲩ ⲥⲉⲉⲓⲣⲉ <text:line-break/><text:span text:style-name="T1"> </text:span><text:span text:style-name="T2">(105/13) </text:span> ⲛ̅ϣⲃⲉⲥⲛⲟⲟⲩⲥ ⲉⲃⲟⲗ ⲅⲁⲣ ϩⲙ̅ ⲡⲉⲉⲓϩⲁⲣⲙⲁ <text:line-break/><text:span text:style-name="T1"> </text:span><text:span text:style-name="T2">(105/14) </text:span> ⲁⲩϫⲓ ⲧⲩⲡⲟⲥ ⲛ̅ϭⲓ ⲡϣⲃⲉⲥⲛⲟⲟⲩⲥ ⲛ̅ⲛⲟⲩ‐ <text:line-break/><text:span text:style-name="T1"> </text:span><text:span text:style-name="T2">(105/15) </text:span> ⲧⲉ ⲁⲩϫⲓ ⲧⲩⲡⲟⲥ ⲁⲧⲣⲟⲩⲣ̅ⲁⲣⲭⲉⲓ ⲉϫⲛ̅ ⲧϫⲃⲉ‐ <text:line-break/><text:span text:style-name="T1"> </text:span><text:span text:style-name="T2">(105/16) </text:span> ⲥⲛⲟⲟⲩⲥ ⲛ̅ⲁⲥⲡⲉ ⲛ̅ⲛ̅ϩⲉⲑⲛⲟⲥ ϩⲓϫⲛ̅ ⲡⲑⲣⲟ‐ <text:line-break/><text:span text:style-name="T1"> </text:span><text:span text:style-name="T2">(105/17) </text:span> ⲛⲟⲥ ⲇⲉ ⲉⲧⲙ̅ⲙⲁⲩ ⲁϥⲧⲁⲙⲓⲉ ϩⲛ̅ⲕⲉⲁⲅ’ⲅⲉ‐ <text:line-break/><text:span text:style-name="T1"> </text:span><text:span text:style-name="T2">(105/18) </text:span> ⲗⲟⲥ ⲙ̅ⲙⲟⲣⲫⲏ ⲛ̅ⲇⲣⲁⲕⲱⲛ ⲉⲩⲙⲟⲩⲧⲉ ⲉⲣⲟ‐ <text:line-break/><text:span text:style-name="T1"> </text:span><text:span text:style-name="T2">(105/19) </text:span> ⲟⲩ ϫⲉ ⲥⲁⲣⲁⲫⲓⲛ ⲉⲩϯ ⲉⲟⲟⲩ ⲛⲁϥ’ ⲛ̅ⲛⲁⲩ <text:line-break/><text:span text:style-name="T1"> </text:span><text:span text:style-name="T2">(105/20) </text:span> ⲛⲓⲙ’ §ⲙⲛ̅ⲛ̅ⲥⲱⲥ ⲁϥⲧⲁⲙⲓⲟ ⲛ̅ⲟⲩⲉⲕⲕⲗⲏⲥⲓⲁ <text:line-break/><text:span text:style-name="T1"> </text:span><text:span text:style-name="T2">(105/21) </text:span> ⲛ̅ⲁⲅⲅⲉⲗⲟⲥ ϩⲛ̅ϣⲟ ⲙⲛ̅ ϩⲛ̅ⲧⲃⲁ ⲉⲙⲛ̅ⲧⲟⲩ <text:line-break/><text:span text:style-name="T1"> </text:span><text:span text:style-name="T2">(105/22) </text:span> ⲏⲡⲉ ⲉⲥⲧⲛ̅ⲧⲟⲛⲧ’ ⲉⲧⲉⲕ’ⲕⲗⲏⲥⲓⲁ ⲉⲧϩⲛ̅ <text:line-break/><text:span text:style-name="T1"> </text:span><text:span text:style-name="T2">(105/23) </text:span> ⲧⲙⲁϩϣⲙⲟⲩⲛⲉ ⲁⲩⲱ ⲟⲩϣⲣⲡ’ⲙ̅ⲙⲓⲥⲉ <text:line-break/><text:span text:style-name="T1"> </text:span><text:span text:style-name="T2">(105/24) </text:span> ⲉⲩⲙⲟⲩⲧⲉ ⲉⲣⲟϥ’ ϫⲉ ⲡⲓⲥⲣⲁⲏⲗ ⲉⲧⲉ ⲡⲁⲉⲓ <text:line-break/><text:span text:style-name="T1"> </text:span><text:span text:style-name="T2">(105/25) </text:span> ⲡⲉ ⲡⲣⲱⲙⲉ ⲉⲧⲛⲁⲩ ⲉⲡⲛⲟⲩⲧⲉ ⲁⲩⲱ ⲕⲉ‐ <text:line-break/><text:span text:style-name="T1"> </text:span><text:span text:style-name="T2">(105/26) </text:span> ⲟⲩⲁ ϫⲉ ⲓⲏ̅ⲥ̅ ⲡⲉⲭⲥ̅ ⲉϥⲧⲛ̅ⲧⲱⲛ ⲉⲡⲥⲱⲧⲏⲣ’ <text:line-break/><text:span text:style-name="T1"> </text:span><text:span text:style-name="T2">(105/27) </text:span> ⲉⲧϩⲓ ⲡⲥⲁ ⲛⲧⲡⲉ ⲛ̅ⲧⲙⲁϩϣⲙⲟⲩⲛⲉ ⲉϥ‐ <text:line-break/><text:span text:style-name="T1"> </text:span><text:span text:style-name="T2">(105/28) </text:span> ϩⲙⲟⲟⲥ ϩⲓ ⲟⲩⲛⲁⲙ’ ⲙ̅ⲙⲟϥ ϩⲓϫⲛ̅ ⲟⲩⲑⲣⲟ‐ <text:line-break/><text:span text:style-name="T1"> </text:span><text:span text:style-name="T2">(105/29) </text:span> ⲛⲟⲥ ⲉϥⲧⲁⲉⲓⲏⲩ ϩⲓ ϭⲃⲟⲩⲣ ⲇⲉ ⲙ̅ⲙⲟϥ ⲉⲥ‐ <text:line-break/><text:span text:style-name="T1"> </text:span><text:span text:style-name="T2">(105/30) </text:span> ϩⲙⲟⲟⲥ ⲛ̅ϭⲓ ⲧⲡⲁⲣⲑⲉⲛⲟⲥ ⲙ̅ⲡⲡ̅ⲛ̅ⲁ̅ ⲉⲧⲟⲩ‐ <text:line-break/><text:span text:style-name="T1"> </text:span><text:span text:style-name="T2">(105/31) </text:span> ⲁⲁⲃ ϩⲓϫⲛ̅ ⲟⲩⲑⲣⲟⲛⲟⲥ ⲉⲥϯ ⲉⲟⲟⲩ ⲛⲁϥ <text:line-break/><text:span text:style-name="T1"> </text:span><text:span text:style-name="T2">(105/32) </text:span> ⲁⲩⲱ ⲥⲉⲁϩⲉⲣⲁⲧⲟⲩ ϩⲓ ⲧⲉⲥⲉϩⲏ ⲛ̅ϭⲓ ⲧⲥⲁ‐ <text:line-break/><text:span text:style-name="T1"> </text:span><text:span text:style-name="T2">(105/33) </text:span> ϣ〈ϥ〉ⲉ ⲙ̅ⲡⲁⲣⲑⲉⲛⲟⲥ ⲉⲩⲙ̅ ⲙⲁⲁⲃⲉ ⲛ̅ϭⲓⲑ̣ⲁ‐ <text:line-break/><text:soft-page-break/><text:span text:style-name="T1"> </text:span><text:span text:style-name="T2">(105/34) </text:span> ⲣⲁ ⲛ̅ⲧⲟⲟⲧⲟⲩ ⲙⲛ̅ ϩⲙⲯⲁⲗⲧⲏⲣⲓⲟⲛ [ⲙ]ⲛ̣̅ <text:line-break/><text:span text:style-name="T1"> </text:span><text:span text:style-name="T2">(106/1) </text:span> ϩⲛⲥⲁⲗⲡⲓⲅⲝ’ ⲉⲩϯ ⲉⲟⲟⲩ ⲛⲁϥ’ ⲁⲩⲱ ⲛ̅ⲥⲧⲣⲁ‐ <text:line-break/><text:span text:style-name="T1"> </text:span><text:span text:style-name="T2">(106/2) </text:span> ⲧⲉⲩⲙⲁ ⲧⲏⲣⲟⲩ ⲛ̅ⲛ̅ⲁⲅⲅⲉⲗⲟⲥ ⲥⲉϯ ⲉⲟⲟⲩ ⲛⲁϥ’ <text:line-break/><text:span text:style-name="T1"> </text:span><text:span text:style-name="T2">(106/3) </text:span> ⲁⲩⲱ ⲥⲉⲥⲙⲟⲩ ⲉⲣⲟϥ’ §ⲉϥϩⲙⲟⲟⲥ ⲇⲉ ϩⲓϫⲛ̅ ⲟⲩ‐ <text:line-break/><text:span text:style-name="T1"> </text:span><text:span text:style-name="T2">(106/4) </text:span> ⲑⲣⲟⲛⲟⲥ ⲟⲩⲟⲉⲓⲛ ⲛ̅〈ⲟⲩ〉ⲛⲟϭ ⲛ̅ⲕⲗⲟⲟⲗⲉ ⲉⲥⲥⲕⲉ‐ <text:line-break/><text:span text:style-name="T1"> </text:span><text:span text:style-name="T2">(106/5) </text:span> ⲡⲁⲥⲉ ⲙ̅ⲙⲟϥ’ ⲁⲩⲱ ⲛⲉ ⲙⲛ̅ ⲗⲁⲁⲩ ⲛⲙ̅ⲙⲁϥ’ <text:line-break/><text:span text:style-name="T1"> </text:span><text:span text:style-name="T2">(106/6) </text:span> ϩⲛ̅ ⲧⲉⲕⲗⲟⲟⲗⲉ ⲉⲓ ⲙⲏⲧⲓ ⲁⲧⲥⲟⲫⲓⲁ 〈ⲛ̅〉ⲧⲡⲓⲥⲡⲥ <text:line-break/><text:span text:style-name="T1"> </text:span><text:span text:style-name="T2">(106/7) </text:span> ⲉⲥⲧⲥⲉⲃⲟ ⲙ̅ⲙⲟϥ’ ⲁⲛⲉⲧϣⲟⲟⲡ’ ⲧⲏⲣⲟⲩ ϩⲛ̅ ⲧⲙⲁϩ‐ <text:line-break/><text:span text:style-name="T1"> </text:span><text:span text:style-name="T2">(106/8) </text:span> ϣⲙⲟⲩⲛⲉ ϫⲉⲕⲁⲁⲥ ⲉⲩⲛⲁⲧⲁⲙⲉⲓⲟ ⲛ̅ⲛ̅ⲧⲟⲛ‐ <text:line-break/><text:span text:style-name="T1"> </text:span><text:span text:style-name="T2">(106/9) </text:span> ⲧⲛ̅ ⲛ̅ⲛⲏ ϣⲓⲛⲁ ⲧⲙⲛ̅ⲧⲉⲣⲟ ⲉⲥⲛⲁⲙⲟⲩⲛ’ ⲉⲃⲟⲗ’ <text:line-break/><text:span text:style-name="T1"> </text:span><text:span text:style-name="T2">(106/10) </text:span> ⲛⲁϥ ϣⲁ ⲧⲥⲩⲛⲧⲉⲗⲉⲓⲁ ⲛⲙ̅ⲡⲏⲩⲉ ⲙ̅ⲡⲭⲁⲟⲥ <text:line-break/><text:span text:style-name="T1"> </text:span><text:span text:style-name="T2">(106/11) </text:span> ⲙⲛ̅ ⲛⲟⲩⲇⲩⲛⲁⲙⲓⲥ §ⲧⲡⲓⲥⲧⲓⲥ ⲇⲉ ⲧⲥⲟⲫⲓⲁⲥ‐ <text:line-break/><text:span text:style-name="T1"> </text:span><text:span text:style-name="T2">(106/12) </text:span> ⲡⲟⲣϫϥ̅ ⲉⲡⲕⲁⲕⲉ ⟦ⲥ⟧ ⲁⲥⲙⲟⲩⲧⲉ ⲉⲣⲟϥ ⲉⲟⲩⲛⲁⲙ <text:line-break/><text:span text:style-name="T1"> </text:span><text:span text:style-name="T2">(106/13) </text:span> ⲙ̅ⲙⲟⲥ ⲡⲁⲣⲭⲓⲅⲉⲛⲉⲧⲱⲣ ⲇⲉ ⲁⲥⲕⲁⲁϥ ϩⲓ ϭⲃⲟⲩⲣ’ <text:line-break/><text:span text:style-name="T1"> </text:span><text:span text:style-name="T2">(106/14) </text:span> ⲙ̅ⲙⲟⲥ ϫⲓⲙ ⲫⲟⲟⲩ ⲉⲧⲙ̅ⲙⲁⲩ ⲁⲩⲙⲟⲩⲧⲉ ⲉⲟⲩ‐ <text:line-break/><text:span text:style-name="T1"> </text:span><text:span text:style-name="T2">(106/15) </text:span> ⲛⲁⲙ ϫⲉ ⲇⲓⲕⲁⲓⲟⲥⲩⲛⲏ ϭⲃⲟⲩⲣ ⲇⲉ ⲁⲩⲙⲟⲩ‐ <text:line-break/><text:span text:style-name="T1"> </text:span><text:span text:style-name="T2">(106/16) </text:span> ⲧⲉ ⲉⲣⲟⲥ ϫⲉ ⲧⲁⲇⲓⲕⲓⲁ ⲉⲧⲃⲉ ⲡⲁⲉⲓ ϭⲉ ⲁⲩϫⲓ <text:line-break/><text:span text:style-name="T1"> </text:span><text:span text:style-name="T2">(106/17) </text:span> ⲧⲏⲣⲟⲩ † ⲛ̅ⲟⲩⲕⲟⲥⲙⲟⲥ ⲛ̅ⲧⲉⲕ’ⲕⲗⲏⲥⲓⲁ ⲛ̅ⲧⲇⲓⲕⲁⲓ‐ <text:line-break/><text:span text:style-name="T1"> </text:span><text:span text:style-name="T2">(106/18) </text:span> ⲟⲥⲩⲛⲏ ⲙⲛ̅ ⲧⲁⲇⲓⲕⲓⲁ ⲁϩⲉ ⲉⲣⲁⲓ̈ ⲉϫⲛ̅ ⲟⲩⲥⲱⲛⲧ’ <text:line-break/><text:span text:style-name="T1"> </text:span><text:span text:style-name="T2">(106/19) </text:span> ⲧⲏⲣⲟⲩ † §ⲡⲁⲣⲭⲓⲅⲉⲛⲉⲧⲱⲣ ϭⲉ ⲙ̅ⲡⲭⲁⲟⲥ ⲛ̅ⲧⲁ‐ <text:line-break/><text:span text:style-name="T1"> </text:span><text:span text:style-name="T2">(106/20) </text:span> ⲣⲉϥⲛⲁⲩ ⲉⲡⲉϥ’ϣⲏⲣⲉ ⲥⲁⲃⲁⲱⲑ ⲁⲩⲱ ⲡⲉ‐ <text:line-break/><text:span text:style-name="T1"> </text:span><text:span text:style-name="T2">(106/21) </text:span> ⲟⲟⲩ ⲉⲧϥⲛ̅ϩⲏⲧϥ’ ϫⲉ ϥ’ⲥⲟⲧⲡ’ ⲁⲛⲉⲝⲟⲩⲥⲓⲁ <text:line-break/><text:span text:style-name="T1"> </text:span><text:span text:style-name="T2">(106/22) </text:span> ⲧⲏⲣⲟⲩ ⲙ̅ⲡⲭⲁⲟⲥ ⲁϥⲕⲱϩ ⲉⲣⲟϥ’ ⲁⲩⲱ ⲛ̅ⲧⲁ‐ <text:line-break/><text:span text:style-name="T1"> </text:span><text:span text:style-name="T2">(106/23) </text:span> ⲣⲉϥϭⲱⲛⲧ’ ⲁϥϫⲡⲟ ⲙ̅ⲡⲙⲟⲩ ⲉⲃⲟⲗ ϩⲙ̅ ⲡⲉϥ’‐ <text:line-break/><text:span text:style-name="T1"> </text:span><text:span text:style-name="T2">(106/24) </text:span> ⲙⲟⲩ ⲁⲩⲕⲁⲑⲓⲥⲧⲁ ⲙ̅ⲙⲟϥ’ ⲉϫⲛ̅ ⲧⲙⲁϩⲥⲟⲉ <text:line-break/><text:span text:style-name="T1"> </text:span><text:span text:style-name="T2">(106/25) </text:span> ⲙ̅ⲡⲉⲁⲩⲧⲁⲣⲡ’ ⲥⲁⲃ̅ⲁ̅ⲱ̅ⲑ̅ ⲙ̅ⲡⲙⲁ ⲉⲧⲙ̅ⲙⲁⲩ’ <text:line-break/><text:span text:style-name="T1"> </text:span><text:span text:style-name="T2">(106/26) </text:span> ⲁⲩⲱ ⲧⲉⲉⲓϩⲉ ⲁϥϫⲱⲕ’ ⲉⲃⲟⲗ ⲛ̅ϭⲓ ⲡⲁⲣⲓⲑⲙⲟⲥ <text:line-break/><text:span text:style-name="T1"> </text:span><text:span text:style-name="T2">(106/27) </text:span> ⲛ̅ⲧⲥⲟⲉ ⲛ̅ⲉⲝⲟⲩⲥⲓⲁ ⲙ̅ⲡⲭⲁⲟⲥ ⲧⲟⲧⲉ ⲡⲙⲟⲩ <text:line-break/><text:span text:style-name="T1"> </text:span><text:span text:style-name="T2">(106/28) </text:span> ⲉϥⲟ ⲛ̅ϩⲟⲩⲧ’ⲥϩⲓⲙⲉ ⲁϥⲧⲱϩ ⲙⲛ̅ ⲧⲉϥⲫⲩⲥⲓⲥ <text:line-break/><text:span text:style-name="T1"> </text:span><text:span text:style-name="T2">(106/29) </text:span> ⲁϥϫⲡⲟ ⲛ̅ⲥⲁϣϥ ⲛ̅ϣⲏⲣⲉ ⲛ̅ϩⲟⲩⲧⲥϩⲓⲙⲉ <text:line-break/><text:span text:style-name="T1"> </text:span><text:span text:style-name="T2">(106/30) </text:span> §ⲛⲁⲉⲓ ⲛⲉ ⲣ̅ⲣⲁⲛ ⲛ̅ⲛ̅ϩⲟⲟⲩⲧ’ ⲡⲕⲱϩ ⲡϭⲱⲛⲧ’ <text:line-break/><text:span text:style-name="T1"> </text:span><text:span text:style-name="T2">(106/31) </text:span> ⲡⲣⲓⲙⲉ ⲡⲁϣ ⲉϩⲟⲙ ⲡⲡⲉⲛⲑⲟⲥ ⲡⲱϣ ⲗⲟⲩ‐ <text:line-break/><text:span text:style-name="T1"> </text:span><text:span text:style-name="T2">(106/32) </text:span> ⲗⲁⲉⲓ ⲡⲣⲓⲙⲉ ⲛ̅ϣⲧⲃⲟ ⲛⲁⲉⲓ ⲇⲉ ⲛⲉ ⲛ̅ⲣⲁⲛ <text:line-break/><text:span text:style-name="T1"> </text:span><text:span text:style-name="T2">(106/33) </text:span> ⲛ̅ⲛⲥϩⲓⲟⲙⲉ ⲧⲟⲣⲅⲏ’ ⲧⲗⲩⲡⲏ ⲑⲏⲇⲟⲛⲏ <text:line-break/><text:span text:style-name="T1"> </text:span><text:span text:style-name="T2">(106/34) </text:span> ⲡⲁϣ ⲉϩⲟⲙ’ ⲡⲥⲁϩⲟⲩⲉ ⲧⲡⲓⲕⲣⲓⲁ ⲧⲙ̅ⲛ̅〈ⲧ〉ϯ ⲧⲱⲛ <text:line-break/><text:span text:style-name="T1"> </text:span><text:span text:style-name="T2">(106/35) </text:span> ⲁⲩⲣ̣̅ⲕⲟⲓⲛⲱⲛⲉⲓ ⲙⲛ̅ ⲛⲟⲩⲉⲣⲏⲩ ⲁⲡⲟⲩⲁ <text:line-break/><text:span text:style-name="T1"> </text:span><text:span text:style-name="T2">(106/36) </text:span> ⲇ̣[ⲉ ⲡⲟ]ⲩⲁ ϫⲡⲉ ⲥⲁϣϥ̅ ϩⲱⲥⲧⲉ ⲥⲉⲉⲓⲣⲉ ⲛ̅ <text:line-break/><text:span text:style-name="T1"> </text:span><text:span text:style-name="T2">(107/1) </text:span> ϩⲙⲉⲯⲓ⟦ⲧ⟧’ ⲛ̅ⲇⲁⲓⲙⲱⲛ ⲛ̅ϩⲟⲩⲧⲥϩⲓⲙⲉ <text:line-break/><text:span text:style-name="T1"> </text:span><text:span text:style-name="T2">(107/2) </text:span> §ⲛⲟⲩⲣⲁⲛ ⲙⲛ̅ ⲛⲟⲩⲉⲛⲉⲣⲅⲉⲓⲁ ⲕⲛⲁϩⲉ <text:line-break/><text:span text:style-name="T1"> </text:span><text:span text:style-name="T2">(107/3) </text:span> ⲉⲣⲟⲟⲩ ϩⲙ̅ ⲡϫⲱⲱⲙⲉ ⲛ̅ⲥⲟⲗⲟⲙⲱⲛ’ <text:line-break/><text:span text:style-name="T1"> </text:span><text:span text:style-name="T2">(107/4) </text:span> §ⲁⲩⲱ ⲙ̅ⲡⲙ̅ⲧⲟ ⲉⲃⲟⲗ’ ⲛ̅ⲛⲁⲉⲓ ⲍⲱⲏ’ ⲉⲧ’‐ <text:line-break/><text:span text:style-name="T1"> </text:span><text:span text:style-name="T2">(107/5) </text:span> ϣⲟⲟⲡ’ ⲙⲛ̅ ⲥⲁⲃⲁⲱⲑ ⲁⲥⲧⲁⲙⲓⲟ ⲥⲁϣϥ̅ <text:line-break/><text:span text:style-name="T1"> </text:span><text:span text:style-name="T2">(107/6) </text:span> ⲛ̅ⲇⲩⲛⲁⲙⲓⲥ ⲉⲛⲁⲛⲟⲩⲟⲩ ⲛ̅ϩⲟⲩⲧⲥϩⲓⲙⲉ <text:line-break/><text:span text:style-name="T1"> </text:span><text:span text:style-name="T2">(107/7) </text:span> ⲛ̅ⲣⲁⲛ ⲛ̅ⲛ̅ϩⲟⲟⲩⲧ ⲛⲉ ⲛⲁⲉⲓ’ ⲡⲉⲧⲉ ⲙⲁϥ‐ <text:line-break/><text:span text:style-name="T1"> </text:span><text:span text:style-name="T2">(107/8) </text:span> ⲕⲱϩ’ ⲡⲙⲁⲕⲁⲣⲓⲟⲥ ⲡ〈ⲉⲧ〉ⲟⲩⲛⲟϥ’ ⲡⲁⲗⲏⲑⲓ‐ <text:line-break/><text:span text:style-name="T1"> </text:span><text:span text:style-name="T2">(107/9) </text:span> ⲛⲟⲥ ⲡⲉⲧⲉ ⲙⲁϥⲫⲑⲟⲛⲉⲓ’ ⲡⲁⲅⲁⲡⲏⲧⲟⲥ <text:line-break/><text:span text:style-name="T1"> </text:span><text:span text:style-name="T2">(107/10) </text:span> ⲡⲉⲧⲛ̅ϩⲟⲧ’ ⲛ̅ϩⲓⲟⲙⲉ ϩⲱⲟⲩ † ⲛⲉ ⲛⲁⲉⲓ ⲛⲟⲩ‐ <text:line-break/><text:soft-page-break/><text:span text:style-name="T1"> </text:span><text:span text:style-name="T2">(107/11) </text:span> ⲣⲁⲛ † ϯⲣⲏⲛⲏ’ ⲡⲟⲩⲣⲁⲧ’ ⲡⲧⲉⲗⲏⲗ ⲧ〈ⲙⲛ̅ⲧ〉ⲙⲁⲕⲁ‐ <text:line-break/><text:span text:style-name="T1"> </text:span><text:span text:style-name="T2">(107/12) </text:span> ⲣⲓⲟⲥ ⲧⲁⲗⲏⲑⲉⲓⲁ ⲧⲁⲅⲁⲡⲏ ⲧⲡⲓⲥⲧⲓⲥ ⲁⲩ‐ <text:line-break/><text:span text:style-name="T1"> </text:span><text:span text:style-name="T2">(107/13) </text:span> ⲱ ⲉⲃⲟⲗ ϩⲛ̅ ⲛⲁⲉⲓ ⲟⲩⲛ̅ ϩⲁϩ ⲙ̅ⲡⲛ̅ⲁ̅ ⲛ̅ⲁⲅⲁ‐ <text:line-break/><text:span text:style-name="T1"> </text:span><text:span text:style-name="T2">(107/14) </text:span> ⲑⲟⲛ ⲁⲩⲱ ⲃ̅ⲃⲁⲗϩⲏⲧ’ §ⲛⲟⲩⲁⲡⲟⲧⲉⲗⲉⲥ‐ <text:line-break/><text:span text:style-name="T1"> </text:span><text:span text:style-name="T2">(107/15) </text:span> ⲙⲁ ⲙⲛ̅ ⲛⲟⲩⲉⲛⲉⲣⲅⲉⲓⲁ ⲕⲛⲁϩⲉ ⲉⲣⲟⲟⲩ ϩⲛ̅ <text:line-break/><text:span text:style-name="T1"> </text:span><text:span text:style-name="T2">(107/16) </text:span> ⲛ̅ⲥⲭⲏⲙⲁ ⲛ̅ϫⲓⲙⲁⲣⲙⲉⲛⲏ’ ⲛ̅ⲧⲡⲉ ⲉⲧⲙ̅‐ <text:line-break/><text:span text:style-name="T1"> </text:span><text:span text:style-name="T2">(107/17) </text:span> ⲡⲥⲁ ⲙⲡⲓⲧⲛ̅ ⲙ̅ⲡⲓⲙ̅ⲛ̅ⲧ̅ⲥⲛⲟⲟⲩⲥ §ⲡⲁⲣⲭⲓ‐ <text:line-break/><text:span text:style-name="T1"> </text:span><text:span text:style-name="T2">(107/18) </text:span> ⲅⲉⲛⲉⲧⲱⲣ ⲇⲉ ⲛ̅ⲧⲁⲣⲉϥⲛⲁⲩ ⲁⲡⲓⲛⲉ ⲛ̅‐ <text:line-break/><text:span text:style-name="T1"> </text:span><text:span text:style-name="T2">(107/19) </text:span> ⲧⲡⲓⲥⲧⲓⲥ ϩⲛ̅ ⲛ̅ⲙ̅ⲙⲟⲟⲩ ⲁϥⲗⲩⲡⲉⲓ ⲉⲙⲁ‐ <text:line-break/><text:span text:style-name="T1"> </text:span><text:span text:style-name="T2">(107/20) </text:span> ⲧⲉ ⲙⲁⲗⲓⲥⲧⲁ ⲛ̅ⲧⲁⲣⲉϥ’ⲥⲱⲧⲙ̅ ⲁⲧⲉⲥⲥⲙⲏ <text:line-break/><text:span text:style-name="T1"> </text:span><text:span text:style-name="T2">(107/21) </text:span> ⲉⲥⲉⲓⲛⲉ ⲛ̅ⲧϣⲟⲣⲡ’ ⲛ̅ⲥⲙⲏ ⲧⲁⲉⲓ ⲉⲛⲧⲁϩ‐ <text:line-break/><text:span text:style-name="T1"> </text:span><text:span text:style-name="T2">(107/22) </text:span> ⲙⲟⲩⲧⲉ ⲉⲣⲟϥ ⲉⲃⲟⲗ ϩⲛ̅ ⲙ̅ⲙⲟⲟⲩ ⲁⲩⲱ <text:line-break/><text:span text:style-name="T1"> </text:span><text:span text:style-name="T2">(107/23) </text:span> ⲛ̅ⲧⲁⲣⲉϥⲉⲓⲙⲉ ϫⲉ ⲧⲁⲉⲓ ⲧⲉ ⲛ̅ⲧⲁϩϯ ⲣⲁⲛ <text:line-break/><text:span text:style-name="T1"> </text:span><text:span text:style-name="T2">(107/24) </text:span> ⲉⲣⲟϥ’ ⲁϥⲉϣ ⲉϩⲟⲙ ⲁϥϣⲓⲡⲉ ⲉϫⲛ̅ ⲧⲉϥ’‐ <text:line-break/><text:span text:style-name="T1"> </text:span><text:span text:style-name="T2">(107/25) </text:span> ⲡⲁⲣⲁⲃⲁⲥⲓⲥ ⲁⲩⲱ ⲛ̅ⲧⲁⲣⲉϥ’ⲉⲓⲙⲉ ⲛⲁ‐ <text:line-break/><text:span text:style-name="T1"> </text:span><text:span text:style-name="T2">(107/26) </text:span> ⲙⲉ ϫⲉ ⲟⲩⲛ̅ ⲟⲩⲣⲱⲙⲉ ⲛ̅ⲁⲧⲙⲟⲩ ⲣ̅ⲣⲙ̅‐ <text:line-break/><text:span text:style-name="T1"> </text:span><text:span text:style-name="T2">(107/27) </text:span> ⲟⲩⲟⲉⲓⲛ ϣⲟⲟⲡ’ ϩⲓ ⲧⲉϥⲉϩⲏ ⲁϥϣⲧⲟⲣ’‐ <text:line-break/><text:span text:style-name="T1"> </text:span><text:span text:style-name="T2">(107/28) </text:span> ⲧⲣ ⲉⲙⲁⲧⲉ ϫⲉ ⲛⲉ ⲁϥϣⲣ̅ⲡⲛ̅ϫⲟⲟⲥ’ <text:line-break/><text:span text:style-name="T1"> </text:span><text:span text:style-name="T2">(107/29) </text:span> ⲛ̅ⲛ̅ⲛⲟⲩⲧⲉ ⲧⲏⲣⲟⲩ ⲙⲛ̅ ⲛⲟⲩⲁⲅⲅⲉⲗⲟⲥ <text:line-break/><text:span text:style-name="T1"> </text:span><text:span text:style-name="T2">(107/30) </text:span> ϫⲉ ⲁⲛⲟⲕ’ ⲡⲉ ⲡⲛⲟⲩⲧⲉ ⲙⲛ̅ ⲕⲉⲟⲩⲁ <text:line-break/><text:span text:style-name="T1"> </text:span><text:span text:style-name="T2">(107/31) </text:span> ϣⲟⲟⲡ’ ⲁϫⲛ̅ⲧ ⲛⲉ ⲁϥⲣ̅ ϩⲟⲧⲉ ⲅⲁⲣ ⲙⲏ‐ <text:line-break/><text:span text:style-name="T1"> </text:span><text:span text:style-name="T2">(107/32) </text:span> ⲡⲱⲥ ⲛ̅ⲥⲉⲉⲓⲙⲉ ϫⲉ ⲟⲩⲛ̅ ⲕⲉⲟⲩⲁ <text:line-break/><text:span text:style-name="T1"> </text:span><text:span text:style-name="T2">(107/33) </text:span> ϣⲟⲟⲡ’ ϩⲓ ⲧⲉϥⲉϩⲏ ⲛ̅ⲥⲉⲣ̅ⲕⲁⲧⲁⲅⲓ‐ <text:line-break/><text:span text:style-name="T1"> </text:span><text:span text:style-name="T2">(107/34) </text:span> ⲛⲱⲥⲕⲉ ⲙ̅ⲙⲟϥ’ §ⲛ̅ⲧⲟϥ ⲇⲉ ϩⲱⲥ ⲁⲛⲟ‐ <text:line-break/><text:span text:style-name="T1"> </text:span><text:span text:style-name="T2">(107/35) </text:span> ⲏⲧⲟⲥ ⲁϥⲕⲁⲧⲁⲫⲣⲟⲛⲉⲓ ⲛ̅ⲧⲕⲁⲧⲁⲅⲛⲱ‐ <text:line-break/><text:span text:style-name="T1"> </text:span><text:span text:style-name="T2">(107/36) </text:span> ⲥⲓⲥ ⲁⲩⲱ ⲁϥⲧⲟⲗⲙⲁ ⲡⲉϫⲁϥ ϫⲉ̣ ⲉϣ’ <text:line-break/><text:span text:style-name="T1"> </text:span><text:span text:style-name="T2">(108/1) </text:span> ϫⲉ ⲟⲩⲁ ϣⲟⲟⲡ’ ϩⲓ ⲧⲁⲉϩⲏ ⲙⲁⲣⲉϥⲟⲩⲱⲛϩ <text:line-break/><text:span text:style-name="T1"> </text:span><text:span text:style-name="T2">(108/2) </text:span> ⲉⲃⲟⲗ ⲕⲁⲥ’ ⲉⲛⲁⲛⲁⲩ ⲉⲡⲉϥ’ⲟⲩⲟⲉⲓⲛ §ⲁⲩⲱ <text:line-break/><text:span text:style-name="T1"> </text:span><text:span text:style-name="T2">(108/3) </text:span> ⲛ̅ⲧⲉⲩⲛⲟⲩ ⲉⲓⲥ ⲟⲩⲟⲉⲓⲛ ⲁϥⲉⲓ ⲉⲃⲟⲗ ϩⲛ̅ ⲧⲙⲁϩ‐ <text:line-break/><text:span text:style-name="T1"> </text:span><text:span text:style-name="T2">(108/4) </text:span> ϣⲙⲟⲩⲛⲉ ⲉⲧⲙ̅ⲡⲥⲁ ⲛϩⲣⲉ ⲁϥϫⲱⲃⲉ ⲛⲙ̅ⲡⲏⲩ‐ <text:line-break/><text:span text:style-name="T1"> </text:span><text:span text:style-name="T2">(108/5) </text:span> ⲉ ⲧⲏⲣⲟⲩ ⲙ̅ⲡⲕⲁϩ’ §ⲛ̅ⲧⲁⲣⲉ ⲡⲁⲣⲭⲓⲅⲉⲛⲉⲧⲱⲣ’ <text:line-break/><text:span text:style-name="T1"> </text:span><text:span text:style-name="T2">(108/6) </text:span> ⲛⲁⲩ ⲉⲡⲟⲩⲟⲉⲓⲛ ϫⲉ ⲛⲉⲥⲱϥ’ ⲉϥⲡⲣ̅ⲣⲓⲱⲟⲩ’ <text:line-break/><text:span text:style-name="T1"> </text:span><text:span text:style-name="T2">(108/7) </text:span> ⲁϥⲣ̅ ϣⲡⲏⲣⲉ ⲁⲩⲱ ⲁϥϣⲓⲡⲉ ⲉⲙⲁⲧⲉ ⲛⲧⲁⲣⲉ <text:line-break/><text:span text:style-name="T1"> </text:span><text:span text:style-name="T2">(108/8) </text:span> ⲡⲓⲟⲩⲟⲉⲓⲛ ⲟⲩⲱⲛϩ ⲉⲃⲟⲗ ⲁⲩⲉⲓⲛⲉ ⲣ̅ⲣⲱⲙⲉ <text:line-break/><text:span text:style-name="T1"> </text:span><text:span text:style-name="T2">(108/9) </text:span> ϭⲱⲗⲡ’ ⲉⲃⲟⲗ ⲛ̅ϩⲏⲧϥ’ ⲉϥⲟ ⲛ̅ϣⲡⲏⲣⲉ ⲉⲙⲁ‐ <text:line-break/><text:span text:style-name="T1"> </text:span><text:span text:style-name="T2">(108/10) </text:span> ⲧⲉ ⲁⲩⲱ ⲙ̅ⲡⲉ ⲗⲁⲁⲩ ⲛⲁⲩ ⲉⲣⲟϥ’ ⲉⲓ ⲙⲏⲧⲓ’ ⲁ‐ <text:line-break/><text:span text:style-name="T1"> </text:span><text:span text:style-name="T2">(108/11) </text:span> ⲡⲁⲣⲭⲓⲅⲉⲛⲉⲧⲱⲣ’ ⲟⲩⲁⲁϥ’ ⲙⲛ̅ ⲧⲉⲡ̣ⲣⲟⲛⲟⲓⲁ <text:line-break/><text:span text:style-name="T1"> </text:span><text:span text:style-name="T2">(108/12) </text:span> ⲉⲧⲛ̅ⲙ̅ⲙⲁϥ’ ⲡⲉϥ’ⲟⲩⲟⲉⲓⲛ ⲇⲉ ⲁϥ’ⲟⲩⲱⲛϩ ⲉⲃⲟⲗ’ <text:line-break/><text:span text:style-name="T1"> </text:span><text:span text:style-name="T2">(108/13) </text:span> ⲛ̅ⲛ̅ⲇⲩⲛⲁⲙⲓⲥ ⲧⲏⲣⲟⲩ ⲛⲙ̅ⲡⲏⲩⲉ ⲉⲧⲃⲉ ⲡⲁⲉⲓ <text:line-break/><text:span text:style-name="T1"> </text:span><text:span text:style-name="T2">(108/14) </text:span> ⲁⲩϣⲧⲟⲣⲧⲣ̅ ⲧⲏⲣⲟⲩ ⲉⲃⲟⲗ ϩⲓⲧⲟⲟⲧϥ̅’ §ⲧⲟⲧⲉ ⲧⲡⲣⲟ‐ <text:line-break/><text:span text:style-name="T1"> </text:span><text:span text:style-name="T2">(108/15) </text:span> ⲛⲟⲓⲁ ⲛ̅ⲧⲁⲣⲉⲥⲛⲁⲩ ⲁⲡⲓⲁⲅⲅⲉⲗⲟⲥ ⲁⲥⲙⲉⲣⲓⲧϥ’ <text:line-break/><text:span text:style-name="T1"> </text:span><text:span text:style-name="T2">(108/16) </text:span> ⲛ̅ⲧⲟϥ’ ⲇⲉ ⲛⲉϥ’ⲙⲟⲥⲧⲉ ⲙ̅ⲙⲟⲥ’ ϫⲉ ⲛⲉⲥϩⲓ ⲡⲕⲁ‐ <text:line-break/><text:span text:style-name="T1"> </text:span><text:span text:style-name="T2">(108/17) </text:span> ⲕⲉ ⲛⲉⲥⲟⲩⲱϣ ⲇⲉ ⲁϭⲟⲗϫⲥ̅ ⲙ̅ⲙⲟϥ’ ⲙ̅ⲡⲉⲥ‐ <text:line-break/><text:span text:style-name="T1"> </text:span><text:span text:style-name="T2">(108/18) </text:span> ϭⲙ̅ϭⲟⲙ ⲛ̅ⲧⲁⲣⲉⲥⲧⲙ̅ϣⲧⲗ̅ϭⲟ ⲙ̅ⲡⲉⲥⲙⲉⲉⲓⲉ <text:line-break/><text:span text:style-name="T1"> </text:span><text:span text:style-name="T2">(108/19) </text:span> ⲁⲥⲡⲱϩⲧ’ ⲙ̅ⲡⲉⲥⲟⲩⲟⲉⲓⲛ’ ⲉϫⲙ̅ ⲡⲕⲁϩ §ϫⲓⲙ’ <text:line-break/><text:span text:style-name="T1"> </text:span><text:span text:style-name="T2">(108/20) </text:span> ⲫⲟⲟⲩ ⲉⲧⲙ̅ⲙⲁⲩ ⲁⲩⲙⲟⲩⲧⲉ ⲁⲡⲁⲅⲅⲉⲗⲟⲥ ⲉ‐ <text:line-break/><text:span text:style-name="T1"> </text:span><text:span text:style-name="T2">(108/21) </text:span> ⲧⲙ̅ⲙⲁⲩ ϫⲉ ⲁⲇⲁⲙ’ ⲟⲩⲟⲉⲓⲛ ⲉⲧⲉ ⲡⲉϥⲟⲩⲱϩⲙ̅ <text:line-break/><text:soft-page-break/><text:span text:style-name="T1"> </text:span><text:span text:style-name="T2">(108/22) </text:span> ⲡⲉ ⲡⲣⲙ̅ⲛ̅ⲥⲛⲟϥ’ ⲛ̅ⲟⲩⲟⲉⲓⲛ † ⲁⲩⲱ ⲁⲡⲕⲁϩ <text:line-break/><text:span text:style-name="T1"> </text:span><text:span text:style-name="T2">(108/23) </text:span> ⲡⲱⲣϣ’ ⲉⲃⲟⲗ’ ⲉϫⲱϥ’ ⲁⲇⲁⲙⲁⲛ ⲉⲧ’ⲟⲩⲁⲁⲃ’ † <text:line-break/><text:span text:style-name="T1"> </text:span><text:span text:style-name="T2">(108/24) </text:span> ⲉⲧⲉ ⲡⲉϥ’ⲟⲩⲱϩⲙ’ ⲡⲉ ⲡⲕⲁϩ ⲛ̅ⲁⲇⲁⲙⲁⲛⲧⲓ‐ <text:line-break/><text:span text:style-name="T1"> </text:span><text:span text:style-name="T2">(108/25) </text:span> ⲛⲏ ⲉⲧⲟⲩⲁⲁⲃ §ϫⲓⲙ ⲫⲟⲟⲩ’ ⲉⲧⲙ̅ⲙⲁⲩ ⲁⲩⲣ̅‐ <text:line-break/><text:span text:style-name="T1"> </text:span><text:span text:style-name="T2">(108/26) </text:span> ⲧⲓⲙⲁ ⲙ̅ⲡⲥⲛⲟϥ’ ⲛ̅ⲧⲡⲁⲣⲑⲉⲛⲟⲥ ⲛ̅ϭⲓ ⲛⲉ‐ <text:line-break/><text:span text:style-name="T1"> </text:span><text:span text:style-name="T2">(108/27) </text:span> ⲝⲟⲩⲥⲓⲁ ⲧⲏⲣⲟⲩ ⲡⲕⲁϩ ⲇⲉ ⲁϥⲧⲟⲩⲃⲟ ⲉⲧⲃⲉ <text:line-break/><text:span text:style-name="T1"> </text:span><text:span text:style-name="T2">(108/28) </text:span> † ⲡⲥⲛⲟϭ ⲛ̅ⲧⲡⲁⲣⲑⲉⲛⲟⲥ §ⲛ̅ϩⲟⲩⲟ ⲇⲉ ⲛ̅ϩⲟⲩⲟ <text:line-break/><text:span text:style-name="T1"> </text:span><text:span text:style-name="T2">(108/29) </text:span> ⲁⲡⲙⲟⲟⲩ ⲧⲟⲩⲃⲟ ϩⲓⲧⲙ̅ ⲡⲉⲓⲛⲉ ⲛ̅ⲧⲡⲓⲥⲧⲓⲥ <text:line-break/><text:span text:style-name="T1"> </text:span><text:span text:style-name="T2">(108/30) </text:span> ⲧⲥⲟⲫⲓⲁ ⲧⲁⲉⲓ ⲛ̅ⲧⲁϩⲟⲩⲱⲛϩ ⲉⲃⲟⲗ’ ⲙ̅‐ <text:line-break/><text:span text:style-name="T1"> </text:span><text:span text:style-name="T2">(108/31) </text:span> ⲡⲁⲣⲭⲓⲅⲉⲛⲉⲧⲱⲣ’ ϩⲛⲛ̅ⲙ̅ⲙⲟⲟⲩ ϩⲛ̅ⲛⲟⲩ‐ <text:line-break/><text:span text:style-name="T1"> </text:span><text:span text:style-name="T2">(108/32) </text:span> ⲉⲩⲗⲟⲅⲟⲛ ϭⲉ ⲁⲩϫⲟⲟⲥ ϫⲉ ϩⲓⲧⲛ̅ ⲙ̅ⲙⲟⲟⲩ <text:line-break/><text:span text:style-name="T1"> </text:span><text:span text:style-name="T2">(108/33) </text:span> ⲡⲙⲟⲟ̣ⲩ ⲉⲧⲟⲩⲁⲁⲃ ⲉⲡⲉⲓ ϥⲧⲛ̅ϩⲟ ⲙ̅ⲡⲧⲏⲣϥ’ <text:line-break/><text:span text:style-name="T1"> </text:span><text:span text:style-name="T2">(109/1) </text:span> ϥⲧⲟⲩⲃⲟ ⲙ̅ⲙⲟϥ §ⲉⲃⲟⲗ ϩⲙ̅ ⲡⲓⲥⲛⲟϥ’ ⲛ̅ϣⲟⲣⲡ’ <text:line-break/><text:span text:style-name="T1"> </text:span><text:span text:style-name="T2">(109/2) </text:span> ⲁⲡⲉⲣⲱⲥ ⲟⲩⲱⲛϩ ⲉⲃⲟⲗ ⲉϥⲟ ⲛ̅ϩⲟⲩⲧⲥϩⲓⲙⲉ <text:line-break/><text:span text:style-name="T1"> </text:span><text:span text:style-name="T2">(109/3) </text:span> ⲧⲉϥⲙⲛ̅ⲧϩⲟⲟⲩⲧ’ ⲡⲉ ϩⲓⲙ̅ⲓ̅ⲣ̅ⲏ̅ⲣ̅ⲓ̅ⲥ ⲉϥⲟ ⲛ̅‐ <text:line-break/><text:span text:style-name="T1"> </text:span><text:span text:style-name="T2">(109/4) </text:span> ⲕⲱϩⲧ’ ⲉⲃⲟⲗ ϩⲙ̅ ⲡⲟⲩⲟⲉⲓⲛ ⲧⲉϥⲙⲛ̅ⲧⲥϩⲓ‐ <text:line-break/><text:span text:style-name="T1"> </text:span><text:span text:style-name="T2">(109/5) </text:span> ⲙⲉ ⲉⲧⲛ̅ⲙ̅ⲙⲁϥ’ ⲟⲩⲯⲩⲭⲏ ⲛ̅ⲥⲛⲟϥ’ ⲟⲩⲉ‐ <text:line-break/><text:span text:style-name="T1"> </text:span><text:span text:style-name="T2">(109/6) </text:span> ⲃⲟⲗ ⲧⲉ ϩⲛ̅ ⲧⲟⲩⲥⲓⲁ ⲛ̅ⲧⲡⲣⲟⲛⲟⲓⲁ ⲛⲉⲥⲱϥ’ <text:line-break/><text:span text:style-name="T1"> </text:span><text:span text:style-name="T2">(109/7) </text:span> ⲉⲙⲁⲧⲉ ϩⲙ̅ ⲡⲉϥⲥⲁ ⲉⲩⲛ̅ⲧⲉϥ’ ⲭⲁⲣⲓⲥ ⲡⲁⲣⲁ <text:line-break/><text:span text:style-name="T1"> </text:span><text:span text:style-name="T2">(109/8) </text:span> ⲛ̅ⲥⲱⲛⲧ’ ⲧⲏⲣⲟⲩ ⲙ̅ⲡⲭⲁⲟⲥ §ⲧⲟⲧⲉ ⲁⲛⲛⲟⲩ‐ <text:line-break/><text:span text:style-name="T1"> </text:span><text:span text:style-name="T2">(109/9) </text:span> ⲧⲉ ⲧⲏⲣⲟⲩ ⲙⲛ̅ ⲛⲟⲩⲁⲅ’ⲅⲉⲗⲟⲥ ⲛ̅ⲧⲁⲣⲟⲩⲛⲁⲩ <text:line-break/><text:span text:style-name="T1"> </text:span><text:span text:style-name="T2">(109/10) </text:span> ⲁⲡⲉⲣⲱⲥ ⲁⲩⲙⲉⲣⲓⲧϥ’ ⲛ̅ⲧⲁⲣⲉϥ’ⲟⲩⲱⲛϩ ⲇⲉ <text:line-break/><text:span text:style-name="T1"> </text:span><text:span text:style-name="T2">(109/11) </text:span> ⲉⲃⲟⲗ ⲛ̅ϩⲏⲧⲟⲩ ⲧⲏⲣⲟⲩ ⲁϥⲣⲁⲕϩⲟⲩ ⲛ̅ⲑⲉ <text:line-break/><text:span text:style-name="T1"> </text:span><text:span text:style-name="T2">(109/12) </text:span> ⲉⲃⲟⲗ ϩⲛ̅ ⲟⲩϩⲏⲃⲥ̅ ⲟⲩⲱⲧ ϣⲁⲣⲉ ϩⲁϩ ⲛ̅ϩⲏⲃ̅ⲥ̅ <text:line-break/><text:span text:style-name="T1"> </text:span><text:span text:style-name="T2">(109/13) </text:span> ϫⲉⲣⲟ ⲁⲩⲱ ⲡⲓⲟⲩⲟⲉⲓⲛ ⲟⲩⲱⲧ’ ⲙ̅ⲙⲁⲩ ⲡϩⲏ̅ⲃ̅ⲥ̅ <text:line-break/><text:span text:style-name="T1"> </text:span><text:span text:style-name="T2">(109/14) </text:span> ⲇⲉ ⲙⲁϥϭⲱϫⲃ ⲁⲩⲱ ⲛ̅ⲧⲉⲉⲓϩⲉ ⲁⲡⲓⲉⲣⲱⲥ <text:line-break/><text:span text:style-name="T1"> </text:span><text:span text:style-name="T2">(109/15) </text:span> ϫⲱⲱⲣⲉ ⲉⲃⲟⲗ ϩⲛ̅ ⲛ̅ⲥⲱⲛⲧ’ ⲧⲏⲣⲟⲩ ⲙ̅ⲡⲭⲁ‐ <text:line-break/><text:span text:style-name="T1"> </text:span><text:span text:style-name="T2">(109/16) </text:span> ⲟⲥ ⲁⲩⲱ ⲙ̅ⲡⲉϥϭⲱϫⲃ̅ §ⲕⲁⲧⲁ ⲑⲉ ⲉⲃⲟⲗ ϩⲛ̅ <text:line-break/><text:span text:style-name="T1"> </text:span><text:span text:style-name="T2">(109/17) </text:span> ⲧⲙⲉⲥⲟⲧⲏⲥ ⲉⲧⲟⲩⲧⲉ ⲡⲟⲩⲟⲉⲓⲛ ⲙⲛ̅ ⲡⲕⲁ‐ <text:line-break/><text:span text:style-name="T1"> </text:span><text:span text:style-name="T2">(109/18) </text:span> ⲕⲉ ⲁϥⲟⲩⲱⲛϩ ⲉⲃⲟⲗ ⲛ̅ϭⲓ ⲡⲉⲣⲱⲥ ϩⲛ̅ ⲧⲙⲉ‐ <text:line-break/><text:span text:style-name="T1"> </text:span><text:span text:style-name="T2">(109/19) </text:span> ⲥⲟⲧⲏⲥ ⲛ̅ⲛ̅ⲁⲅⲅⲉⲗⲟⲥ ⲙⲛ̅ ⲣ̅ⲣⲱⲙⲉ ⲁⲥϫⲱⲕ <text:line-break/><text:span text:style-name="T1"> </text:span><text:span text:style-name="T2">(109/20) </text:span> ⲉⲃⲟⲗ ⲛ̅ϭⲓ ⲧⲥⲩⲛⲟⲩⲥⲓⲁ ⲙ̅ⲡⲉⲣⲱⲥ ⲧⲉⲓ̈ϩⲉ <text:line-break/><text:span text:style-name="T1"> </text:span><text:span text:style-name="T2">(109/21) </text:span> ⲉϩⲣⲁⲓ̈ ϩⲙ̅ ⲡⲕⲁϩ ⲁⲥϯ ⲟⲩⲱ ⲛ̅ϭⲓ ⲧϣⲟⲣⲡ ⲛ̅‐ <text:line-break/><text:span text:style-name="T1"> </text:span><text:span text:style-name="T2">(109/22) </text:span> ϩⲏⲇⲟⲛⲏ §ⲁⲧⲥϩⲓⲙⲉ ⲟⲩⲁϩⲥ̅ ⲛ̅ⲥⲁ ⲡⲕⲁϩ <text:line-break/><text:span text:style-name="T1"> </text:span><text:span text:style-name="T2">(109/23) </text:span> ⲁⲩⲱ ⲁⲡⲅⲁⲙⲟⲥ ⲟⲩⲏϩ ⲛ̅ⲥⲁ ⲧⲥϩⲓⲙⲉ ⲁⲡ’‐ <text:line-break/><text:span text:style-name="T1"> </text:span><text:span text:style-name="T2">(109/24) </text:span> ϫⲡⲟ ⲟⲩⲏϩ ⲛ̅ⲥⲁ ⲡⲅⲁⲙⲟⲥ ⲁⲡⲃⲱⲗ ⲉⲃⲟⲗ <text:line-break/><text:span text:style-name="T1"> </text:span><text:span text:style-name="T2">(109/25) </text:span> † ⲑⲩⲁϩϥ ⲛ̅ⲥⲁ ⲡⲉϫⲡⲟ §ⲙ̅ⲙⲛ̅ⲛⲥⲁ ⲡⲉⲣⲱⲥ <text:line-break/><text:span text:style-name="T1"> </text:span><text:span text:style-name="T2">(109/26) </text:span> ⲉⲧⲙ̅ⲙⲁⲩ ⲁⲧⲃⲉⲛⲉⲗⲁⲁⲗⲉ ϯ ⲟⲩⲱ ⲉϩⲣⲁⲓ̈ <text:line-break/><text:span text:style-name="T1"> </text:span><text:span text:style-name="T2">(109/27) </text:span> ⲉⲃⲟⲗ ϩⲙ̅ ⲡⲓⲥⲛⲟϥ ⲛ̅ⲧⲁⲩⲡⲁϩⲧϥ̅ ⲉϫⲙ̅ <text:line-break/><text:span text:style-name="T1"> </text:span><text:span text:style-name="T2">(109/28) </text:span> ⲡⲕⲁϩ ⲉⲧⲃⲉ ⲡⲁⲓ̈ ⲛⲉⲧ’ⲥⲱ ⲙ̅ⲙⲟϥ’ ϣⲁⲩ‐ <text:line-break/><text:span text:style-name="T1"> </text:span><text:span text:style-name="T2">(109/29) </text:span> ϫⲡⲟ ⲛⲁⲩ ⲛ̅ⲧⲉⲡⲓⲑⲩⲙⲓⲁ ⲛ̅ⲧⲥⲩⲛⲟⲩⲥⲓⲁ <text:line-break/><text:span text:style-name="T1"> </text:span><text:span text:style-name="T2">(109/30) </text:span> ⲙ̅ⲙⲛ̅ⲛ̅ⲥⲁ ⲧⲃⲉⲛⲉⲗⲟⲟⲗⲉ ⲁⲩⲃⲉⲛ̅ⲕⲛ̅‐ <text:line-break/><text:span text:style-name="T1"> </text:span><text:span text:style-name="T2">(109/31) </text:span> ⲧⲉ ⲙⲛ̅ⲛⲟⲩⲃⲉⲛ̅ⲗⲁϩⲙⲉⲛ ϯ ⲟⲩⲱ ⲉϩ‐ <text:line-break/><text:span text:style-name="T1"> </text:span><text:span text:style-name="T2">(109/32) </text:span> ⲣⲁⲓ̈ ϩⲙ̅ ⲡⲕⲁϩ ⲙⲛ̅ ⲡⲕⲉⲥⲉⲉⲡⲉ ⲛ̅ϣⲏⲛ <text:line-break/><text:span text:style-name="T1"> </text:span><text:span text:style-name="T2">(109/33) </text:span> ⲕⲁⲧⲁ ⲅⲉⲛⲟⲥ ⲉⲩⲛ̅ⲧⲁⲩ ⲙ̅ⲙⲁⲩ ⲙ̅ⲡⲟⲩ‐ <text:line-break/><text:span text:style-name="T1"> </text:span><text:span text:style-name="T2">(109/34) </text:span> ⲥⲡⲉⲣⲙⲁ ϩⲣⲁⲓ̈ ⲛ̅ϩⲏⲧⲟⲩ ⲉⲃⲟⲗ ϩⲙ ⲡ’ <text:line-break/><text:span text:style-name="T1"> </text:span><text:span text:style-name="T2">(110/1) </text:span> ⲥⲡⲉⲣⲙⲁ ⲛ̅ⲛ̅ⲉⲝⲟⲩⲥⲓⲁ ⲙⲛ̅ ⲛ ⲛⲟⲩⲁⲅⲅⲉⲗⲟⲥ <text:line-break/><text:soft-page-break/><text:span text:style-name="T1"> </text:span><text:span text:style-name="T2">(110/2) </text:span> §ⲧⲟⲧⲉ ⲧⲇⲓⲕⲁⲓⲟⲥⲩⲛⲏ ⲁⲥⲧⲁⲙⲉⲓⲟ ⲡⲡⲁ‐ <text:line-break/><text:span text:style-name="T1"> </text:span><text:span text:style-name="T2">(110/3) </text:span> ⲣⲁⲇⲉⲓⲥⲟⲥ ⲉⲛⲉⲥⲱϥ ⲉϥⲙ̅ⲡⲃⲟⲗ’ ⲙ̅ⲡⲕⲩ‐ <text:line-break/><text:span text:style-name="T1"> </text:span><text:span text:style-name="T2">(110/4) </text:span> ⲕⲗⲟⲥ ⲙ̅ⲡⲟⲟϩ ⲙⲛ̅ ⲡⲕⲩⲕⲗⲟⲥ ⲙ̅ⲡⲣⲏ ϩⲙ̅ <text:line-break/><text:span text:style-name="T1"> </text:span><text:span text:style-name="T2">(110/5) </text:span> ⲡⲕⲁϩ ⲛ̅ⲧⲣⲩⲫⲏ’ ⲉⲧ〈ⲛ̅〉ⲙ̅ⲙⲁ ⲛ̅ϣⲁ ϩⲛ̅ ⲧⲙⲏⲧⲉ <text:line-break/><text:span text:style-name="T1"> </text:span><text:span text:style-name="T2">(110/6) </text:span> ⲛ̅ⲛ̅ⲱⲛⲉ ⲁⲩⲱ ⲧⲉⲡⲓⲑⲩⲙⲓⲁ ϩⲛ̅ ⲧⲙⲏⲧⲉ ⲛ̅‐ <text:line-break/><text:span text:style-name="T1"> </text:span><text:span text:style-name="T2">(110/7) </text:span> ⲛ̅ϣⲏⲛ ⲉⲛⲉⲥⲱⲟⲩ ⲉⲩⲟ ⲛ̅ⲗⲁϩⲗϩ ⲁⲩⲱ <text:line-break/><text:span text:style-name="T1"> </text:span><text:span text:style-name="T2">(110/8) </text:span> ⲡϣⲏⲛ ⲙ̅ⲡⲱⲛϩ ⲛ̅ⲛⲁⲧⲙⲟⲩ ⲛ̅ⲑⲉ ⲛ̅ⲧⲁϥ’‐ <text:line-break/><text:span text:style-name="T1"> </text:span><text:span text:style-name="T2">(110/9) </text:span> ⲟⲩⲱⲛϩ ⲉⲃⲟⲗ ϩⲙ̅ ⲡⲟⲩⲱϣ ⲙ̅ⲡⲛⲟⲩⲧⲉ <text:line-break/><text:span text:style-name="T1"> </text:span><text:span text:style-name="T2">(110/10) </text:span> ϩⲙ̅ ⲡⲥⲁ ⲙϩⲓⲧ’ ⲙ̅ⲡⲡⲁⲣⲁⲇⲉⲓⲥⲟⲥ ⲁⲧⲣⲉϥⲣ̅ <text:line-break/><text:span text:style-name="T1"> </text:span><text:span text:style-name="T2">(110/11) </text:span> ⲙ̅ⲯⲩⲭⲏ ⲛ̅ⲛⲉⲧⲟⲩⲁⲁⲃ’ ⲛ̅ⲁⲑⲁⲛⲁⲧⲟⲥ ⲛⲁⲉⲓ <text:line-break/><text:span text:style-name="T1"> </text:span><text:span text:style-name="T2">(110/12) </text:span> ⲉⲧⲛ̅ⲛⲏⲩ ⲉⲃⲟⲗ’ ϩⲛ̅ ⲛ̅ⲡⲗⲁⲥⲙⲁ ⲛ̅ⲧⲙⲛ̅ⲧ‐ <text:line-break/><text:span text:style-name="T1"> </text:span><text:span text:style-name="T2">(110/13) </text:span> ϩⲏⲕⲉ ⲛ̅ⲧⲥⲩⲛ’ⲧⲉⲗⲉⲓⲁ ⲙ̅ⲡⲁⲓⲱⲛ ⲡⲉⲩⲁⲛ <text:line-break/><text:span text:style-name="T1"> </text:span><text:span text:style-name="T2">(110/14) </text:span> ⲇⲉ ⲙ̅ⲡϣⲏⲛ ⲙ̅ⲡⲱⲛϩ ⲛ̅ⲑⲉ ⲙ̅ⲡⲣⲏ ⲁⲩⲱ <text:line-break/><text:span text:style-name="T1"> </text:span><text:span text:style-name="T2">(110/15) </text:span> ⲛⲉϥⲕⲗⲁⲇⲟⲥ ⲛⲉⲥⲱⲟⲩ ⲛⲉϥϭⲱⲃⲉ ⲛ̅ⲑⲉ <text:line-break/><text:span text:style-name="T1"> </text:span><text:span text:style-name="T2">(110/16) </text:span> ⲛ̅ⲛⲁ ⲡⲕⲩⲡⲁⲣⲓⲥⲥⲟⲥ ⲡⲉϥⲕⲁⲣⲡⲟⲥ ⲛ̅ⲑⲉ <text:line-break/><text:span text:style-name="T1"> </text:span><text:span text:style-name="T2">(110/17) </text:span> ⲛ̅ⲛⲓⲥⲙⲁϩ ⲛ̅ⲉⲗⲟⲟⲗⲉ ⲉϥⲟⲩⲟⲃϣ̅ ⲡⲉϥϫⲓ‐ <text:line-break/><text:span text:style-name="T1"> </text:span><text:span text:style-name="T2">(110/18) </text:span> ⲥⲉ ⲃⲏⲕ ϣⲁϩⲣⲁⲓ̈ ⲉⲧⲡⲉ §ⲁⲩⲱ ⲁⲧⲟⲩⲱϥ ⲡϣⲏⲛ <text:line-break/><text:span text:style-name="T1"> </text:span><text:span text:style-name="T2">(110/19) </text:span> ⲛ̅ⲧⲅⲛⲱⲥⲓⲥ ⲉⲩⲛ̅ⲧⲁϥ’ ⲙ̅ⲙⲁⲩ ⲛ̅ⲧⲇⲩⲛⲁⲙⲓⲥ <text:line-break/><text:span text:style-name="T1"> </text:span><text:span text:style-name="T2">(110/20) </text:span> ⲙ̅ⲡⲛⲟⲩⲧⲉ ⲡⲉϥ’ⲉⲟⲟⲩ ⲟ ⲛ̅ⲑⲉ ⲙ̅ⲡⲟⲟϩ ⲉϥ’‐ <text:line-break/><text:span text:style-name="T1"> </text:span><text:span text:style-name="T2">(110/21) </text:span> ⲡⲣ̅ⲣⲓⲱⲟⲩ ⲉⲙⲁⲧⲉ ⲁⲩⲱ ⲛⲉϥⲧⲁⲣ’ ⲛⲉⲥⲱⲟⲩ <text:line-break/><text:span text:style-name="T1"> </text:span><text:span text:style-name="T2">(110/22) </text:span> ⲛⲉϥϭⲱⲱⲃⲉ ⲟ ⲛ̅ⲑⲉ ⲛ̅ⲛⲓϭⲱⲱⲃⲉ ⲛ̅ⲕⲛ̅ⲧⲉ <text:line-break/><text:span text:style-name="T1"> </text:span><text:span text:style-name="T2">(110/23) </text:span> ⲡⲉϥⲕⲁⲣⲡⲟⲥ ⲟ ⲛ̅ⲑⲉ ⲛ̅ⲛⲓⲃⲛ̅ⲛⲉ’ ⲉⲧⲛⲁⲛⲟⲩ‐ <text:line-break/><text:span text:style-name="T1"> </text:span><text:span text:style-name="T2">(110/24) </text:span> ⲟⲩ ⲛ̅ⲗⲉϩⲗϩ̅ ⲡⲁⲉⲓ ⲇⲉ ⲉϥϩⲓ ⲡⲥⲁ ⲙϩⲓⲧ’ ⲙ̅ⲡⲁ‐ <text:line-break/><text:span text:style-name="T1"> </text:span><text:span text:style-name="T2">(110/25) </text:span> ⲣⲁⲇⲓⲥⲟⲥ ⲁⲧⲣⲉϥ’ⲧⲱⲟⲩⲛ ⲛⲙ̅ⲯⲩⲭⲏ ⲉⲃⲟⲗ <text:line-break/><text:span text:style-name="T1"> </text:span><text:span text:style-name="T2">(110/26) </text:span> ϩⲛ̅ ⲧⲃ̅ϣⲉ’ ⲛ̅ⲛ̅ⲇⲁⲓⲙⲱⲛ ϫⲉⲕⲁⲁⲥ ⲉⲩⲛⲏⲩ <text:line-break/><text:span text:style-name="T1"> </text:span><text:span text:style-name="T2">(110/27) </text:span> ⲉϩⲟⲩⲛ’ ⲉⲡϣⲏⲛ’ ⲙ̅ⲡⲱⲛϩ ⲛ̅ⲥⲉⲟⲩⲱⲙ’ ⲙ̅‐ <text:line-break/><text:span text:style-name="T1"> </text:span><text:span text:style-name="T2">(110/28) </text:span> ⲡⲉϥⲕⲁⲣⲡⲟⲥ ⲁⲩⲱ ⲛ̅ⲥⲉⲣ̅ⲕⲁⲧⲁⲕⲣⲓⲛⲉ ⲛ̅ⲛ̅‐ <text:line-break/><text:span text:style-name="T1"> </text:span><text:span text:style-name="T2">(110/29) </text:span> ⲉⲝⲟⲩⲥⲓⲁ ⲙⲛ̅ ⲛⲟⲩⲁⲅ’ⲅⲉⲗⲟⲥ §ⲡⲁⲡⲟⲧⲉⲗⲉⲥ‐ <text:line-break/><text:span text:style-name="T1"> </text:span><text:span text:style-name="T2">(110/30) </text:span> ⲙⲁ ⲙ̅ⲡⲉⲉⲓϣⲏⲛ ϥⲥⲏϩ ϩⲛ̅ ϫⲓⲉⲣⲁ ⲃⲓⲃⲗⲟⲥ <text:line-break/><text:span text:style-name="T1"> </text:span><text:span text:style-name="T2">(110/31) </text:span> ϫⲉ ⲛ̅ⲧⲟⲕ ⲡⲉ ⲡϣⲏⲛ ⲛ̅ⲧⲅⲛⲱⲥⲓⲥ ⲡⲁⲉⲓ <text:line-break/><text:span text:style-name="T1"> </text:span><text:span text:style-name="T2">(110/32) </text:span> ⲉⲧϩⲙ̅ ⲡⲁⲣⲁⲇⲉⲓⲥⲟⲥ ⲡⲁⲉⲓ ⲛ̅ⲧⲁ ⲡϣⲟⲣⲡ’ <text:line-break/><text:span text:style-name="T1"> </text:span><text:span text:style-name="T2">(110/33) </text:span> ⲣ̅ⲣⲱⲙⲉ ⲟⲩⲟⲙϥ’ ⲁϥⲟⲩⲏⲛ’ ⲁⲡⲉϥⲛⲟⲩⲥ <text:line-break/><text:span text:style-name="T1"> </text:span><text:span text:style-name="T2">(110/34) </text:span> ⲁϥⲙⲣ̅ⲣⲉ ⲧⲉϥ’ϣⲃⲣ̅ⲉⲓⲛⲉ ⲁϥⲣ̅ⲕⲁⲧⲁⲕⲣⲓⲛⲉ <text:line-break/><text:span text:style-name="T1"> </text:span><text:span text:style-name="T2">(111/1) </text:span> 〈ⲛ̅〉ⲛ̅ⲕⲉⲉⲓⲛⲉ ⲛ̅ⲁⲗⲗⲟⲧⲣⲓⲟⲛ ⲁϥⲥⲓⲭⲁⲛⲉ ⲉⲣⲟ‐ <text:line-break/><text:span text:style-name="T1"> </text:span><text:span text:style-name="T2">(111/2) </text:span> ⲟⲩ’ §ⲙⲛ̅ⲛ̅ⲥⲁ ⲡⲁⲉⲓ ⲇⲉ ⲁⲧⲃⲉⲛϫⲟⲉⲓⲧ’ ϯ ⲟⲩⲱ <text:line-break/><text:span text:style-name="T1"> </text:span><text:span text:style-name="T2">(111/3) </text:span> ⲉϩⲣⲁⲓ̈ ⲧⲁⲉⲓ ⲉⲧⲛⲁⲧⲟⲩⲃⲟ ⲛ̅ⲣ̅ⲣⲱⲟⲩ ⲙⲛ̅ ⲛ̅‐ <text:line-break/><text:span text:style-name="T1"> </text:span><text:span text:style-name="T2">(111/4) </text:span> ⲁⲣⲭⲓⲉⲣⲉⲩⲥ ⲛ̅ⲧⲇⲓⲕⲁⲓⲟⲥⲩⲛⲏ ⲛⲁⲉⲓ ⲉⲧⲛⲁ‐ <text:line-break/><text:span text:style-name="T1"> </text:span><text:span text:style-name="T2">(111/5) </text:span> ⲟⲩⲱⲛϩ ⲉⲃⲟⲗ ϩⲛ̅ ⲛ̅ϩⲁⲉⲩ ⲛ̅ⲛⲉϩⲟⲟⲩ’ ⲉⲁ‐ <text:line-break/><text:span text:style-name="T1"> </text:span><text:span text:style-name="T2">(111/6) </text:span> ⲧⲃⲉⲛϫⲟⲉⲓⲧ ⲇⲉ ⲟⲩⲱⲛϩ ⲉⲃⲟⲗ ϩⲙ̅ ⲡⲟⲩⲟ‐ <text:line-break/><text:span text:style-name="T1"> </text:span><text:span text:style-name="T2">(111/7) </text:span> ⲉⲓⲛ ⲙ̅ⲡϣⲟⲣⲡ’ ⲛ̅ⲁⲇⲁⲙ ⲉⲧⲃⲉ ⲡⲭⲣⲓⲥⲙⲁ <text:line-break/><text:span text:style-name="T1"> </text:span><text:span text:style-name="T2">(111/8) </text:span> ⲉⲧⲟⲩ〈ⲛⲁ〉ϫⲓⲧϥ’ §ⲧϣⲟⲣⲡ’ ⲇⲉ ⲙ̅ⲯⲩⲭⲏ ⲁⲥⲙⲣ̅ⲣⲉ <text:line-break/><text:span text:style-name="T1"> </text:span><text:span text:style-name="T2">(111/9) </text:span> ⲡⲉⲣⲱⲥ ⲉⲧⲛ̅ⲛⲙ̅ⲙⲁⲥ ⲁⲥⲡⲱϩⲧ’ ⲙ̅ⲡⲉⲥ‐ <text:line-break/><text:span text:style-name="T1"> </text:span><text:span text:style-name="T2">(111/10) </text:span> 〈ⲥ〉ⲛⲟϥ’ ⲉϩⲣⲁⲓ̈ ⲉϫⲱϥ’ ⲁⲩⲱ ⲉϫⲙ̅ ⲡⲕⲁϩ ⲉⲃⲟⲗ <text:line-break/><text:span text:style-name="T1"> </text:span><text:span text:style-name="T2">(111/11) </text:span> ⲇⲉ ϩⲙ̅ ⲡⲥⲛⲟϥ’ ⲉⲧⲙ̅ⲙⲁⲩ ⲁⲧⲟⲩⲣⲧ’ ϯ ⲟⲩ‐ <text:line-break/><text:span text:style-name="T1"> </text:span><text:span text:style-name="T2">(111/12) </text:span> ⲱ ⲉϩⲣⲁⲓ̈ ϩⲙ̅ ⲡⲕⲁϩ ⲛ̅ϣⲟⲣⲡ’ ⲉⲃⲟⲗ ϩⲙ̅ <text:line-break/><text:span text:style-name="T1"> </text:span><text:span text:style-name="T2">(111/13) </text:span> ⲡϣⲟⲛⲧⲉ ⲉⲩⲣⲁϣⲉ ⲙ̅ⲡⲟⲩⲟⲉⲓⲛ ⲡⲁⲓ̈ ⲉⲧ’‐ <text:line-break/><text:span text:style-name="T1"> </text:span><text:span text:style-name="T2">(111/14) </text:span> ⲛⲁⲟⲩⲱⲛϩ ⲉⲃⲟⲗ ϩⲙ̅ ⲡⲃⲁⲧⲟⲥ §ⲙ̅ⲙⲛ̅ⲛ̅ⲥⲁ <text:line-break/><text:soft-page-break/><text:span text:style-name="T1"> </text:span><text:span text:style-name="T2">(111/15) </text:span> ⲡⲁⲉⲓ ⲁⲛ’ ⲛ̅ϩⲣⲏⲣⲉ ⲉⲛⲉⲥⲱⲟⲩ ⲉⲧⲟ ⲛ̅ⲥⲧⲟⲉⲓ <text:line-break/><text:span text:style-name="T1"> </text:span><text:span text:style-name="T2">(111/16) </text:span> ⲉⲛⲁⲛⲟⲩϥ’ ⲁⲩϯ ⲟⲩⲱ ⲉϩⲣⲁⲓ̈ ϩⲙ̅ ⲡⲕⲁϩ ⲕⲁ‐ <text:line-break/><text:span text:style-name="T1"> </text:span><text:span text:style-name="T2">(111/17) </text:span> ⲧⲁ ⲅⲉⲛⲟⲥ ⲉⲃⲟⲗ ϩⲛ̅ ⲧⲟⲩⲉⲓ ⲧⲟⲩⲉⲓ ⲙ̅ⲡⲁⲣ‐ <text:line-break/><text:span text:style-name="T1"> </text:span><text:span text:style-name="T2">(111/18) </text:span> ⲑⲉⲛⲟⲥ ⲛ̅ⲧⲉ ⲛ̅ϣⲉⲉⲣⲉ ⲛ̅ⲧⲡⲣⲟⲛⲟⲓⲁ’ <text:line-break/><text:span text:style-name="T1"> </text:span><text:span text:style-name="T2">(111/19) </text:span> ⲛⲁⲉⲓ ⲛ̅ⲧⲁⲣⲟⲩⲙⲉⲣⲉ ⲡⲉⲣⲱⲥ ⲁⲩⲡⲱϩⲧ’ <text:line-break/><text:span text:style-name="T1"> </text:span><text:span text:style-name="T2">(111/20) </text:span> ⲙ̅ⲡⲟⲩⲥⲛⲟϥ’ ⲉϫⲱϥ’ ⲁⲩⲱ ⲉϫⲙ̅ ⲡⲕⲁϩ’ §ⲙ̅‐ <text:line-break/><text:span text:style-name="T1"> </text:span><text:span text:style-name="T2">(111/21) </text:span> ⲙⲛ̅ⲛ̅ⲥⲁ ⲛⲁⲉⲓ’ ⲁⲃⲟⲧⲁⲛⲏ ⲛⲓⲙ’ ϯ ⲟⲩⲱ ⲉϩ‐ <text:line-break/><text:span text:style-name="T1"> </text:span><text:span text:style-name="T2">(111/22) </text:span> ⲣⲁⲓ̈ ϩⲙ̅ ⲡⲕⲁϩ ⲕⲁⲧⲁ ⲅⲉⲛⲟⲥ ⲉⲩⲛ̅ⲧⲁⲩ ⲙ̅‐ <text:line-break/><text:span text:style-name="T1"> </text:span><text:span text:style-name="T2">(111/23) </text:span> ⲙⲁⲩ ⲙ̅ⲡⲉⲥⲡⲉⲣⲙⲁ ⲛ̅ⲉⲝⲟⲩⲥⲓⲁ ⲙⲛ̅ ⲛⲟⲩ‐ <text:line-break/><text:span text:style-name="T1"> </text:span><text:span text:style-name="T2">(111/24) </text:span> ⲁⲅ’ⲅⲉⲗⲟⲥ ⲙⲛ̅ⲛ̅ⲥⲁ ⲛⲁⲉⲓ’ ⲁⲛⲉⲝⲟⲩⲥⲓⲁ <text:line-break/><text:span text:style-name="T1"> </text:span><text:span text:style-name="T2">(111/25) </text:span> ⲥⲱⲛⲧ’ ⲉⲃⲟⲗ ϩⲛ̅ ⲙ̅ⲙⲟⲟⲩ ⲛ̅ⲑⲏⲣⲓⲟⲛ ⲛⲓⲙ <text:line-break/><text:span text:style-name="T1"> </text:span><text:span text:style-name="T2">(111/26) </text:span> ⲕⲁⲧⲁ ⲅⲉⲛⲟⲥ ⲁⲩⲱ ⲛ̅ϫⲁⲧⲃⲉ ⲙⲛ̅ ⲛϩⲁ’‐ <text:line-break/><text:span text:style-name="T1"> </text:span><text:span text:style-name="T2">(111/27) </text:span> ⲗⲁⲧⲉ ⲕⲁⲧⲁ ⲅⲉⲛⲟⲥ ⲉⲩⲛ̅ⲧⲁⲩ ⲙ̅ⲙⲁⲩ ⲙ̅‐ <text:line-break/><text:span text:style-name="T1"> </text:span><text:span text:style-name="T2">(111/28) </text:span> ⲡⲥⲡⲉⲣⲙⲁ ⲛ̅ⲉⲝⲟⲩⲥⲓⲁ ⲙⲛ̅ ⲛⲟⲩⲁⲅⲅⲉⲗⲟⲥ <text:line-break/><text:span text:style-name="T1"> </text:span><text:span text:style-name="T2">(111/29) </text:span> §ϩⲁ ⲧⲉϩⲏ ⲇⲉ ⲛ̅ⲛⲁⲉⲓ ⲧⲏⲣⲟⲩ ⲛ̅ⲧⲁⲣⲉϥ’ⲟⲩ‐ <text:line-break/><text:span text:style-name="T1"> </text:span><text:span text:style-name="T2">(111/30) </text:span> ⲱⲛϩ ⲉⲃⲟⲗ’ ⲙ̅ⲡϣⲟⲣⲡ’ ⲛ̅ϩⲟⲟⲩ ⲥⲛⲁⲩ ⲁϥϭⲱ <text:line-break/><text:span text:style-name="T1"> </text:span><text:span text:style-name="T2">(111/31) </text:span> ϩⲓϫⲙ̅ ⲡⲕⲁ[ϩ] ⲙ̅ⲡⲣⲏⲧⲉ ⲛ̅ϩⲟⲟⲩ ⲥⲛⲁⲩ ⲁϥ‐ <text:line-break/><text:span text:style-name="T1"> </text:span><text:span text:style-name="T2">(111/32) </text:span> ⲕⲱ ⲛ̅ⲧⲡⲣⲟⲛⲟⲓⲁ ⲉⲧⲙ̅ⲡⲥⲁ ⲙⲡⲓⲧⲛ̅ ϩⲛ̅ <text:line-break/><text:span text:style-name="T1"> </text:span><text:span text:style-name="T2">(111/33) </text:span> ⲧⲡⲉ ⲁϥⲃⲱⲕ’ ⲉϩⲣⲁⲓ̈ ⲉⲡⲉϥ’ⲟⲩⲟⲉⲓⲛ ⲁⲩⲱ <text:line-break/><text:span text:style-name="T1"> </text:span><text:span text:style-name="T2">(111/34) </text:span> ⲛ̅ⲧⲉⲩⲛⲟⲩ ⲁⲡⲕⲁⲕⲉ ϣⲱⲡⲉ ⲁϫⲙ̣̅ ⲡⲕ̣ⲟ̣ⲥ̣ⲙⲟ̣[ⲥ] <text:line-break/><text:span text:style-name="T1"> </text:span><text:span text:style-name="T2">(112/1) </text:span> ⲧⲏⲣϥ’ §ⲧⲥⲟⲫⲓⲁ ⲇⲉ ⲉⲧϩⲛ̅ ⲧⲡⲉ ⲙ̅ⲡⲥⲁ ⲙⲡⲓⲧⲛ̅ <text:line-break/><text:span text:style-name="T1"> </text:span><text:span text:style-name="T2">(112/2) </text:span> ⲛ̅ⲧⲁⲣⲉⲥⲟⲩⲱϣ ⲁⲥϫⲓ ⲟⲩⲉⲝⲟⲩⲥⲓⲁ ⲛ̅ⲧⲟⲟⲧⲥ̅ <text:line-break/><text:span text:style-name="T1"> </text:span><text:span text:style-name="T2">(112/3) </text:span> ⲛ̅ⲧⲡⲓⲥⲧⲓⲥ ⲁⲥⲧⲁⲙⲓⲟ ⲛ̅ϩⲛ̅ⲛⲟϭ ⲛ̅ⲣⲉϥ’ⲣ̅ ⲟⲩⲟ‐ <text:line-break/><text:span text:style-name="T1"> </text:span><text:span text:style-name="T2">(112/4) </text:span> ⲉⲓⲛ ⲙⲛ̅ ⲛ̅ⲥⲓⲟⲩ ⲧⲏⲣⲟⲩ ⲁⲥⲕⲁⲁⲩ ϩⲛ̅ ⲧⲡⲉ ⲁⲧⲣⲟⲩ‐ <text:line-break/><text:span text:style-name="T1"> </text:span><text:span text:style-name="T2">(112/5) </text:span> ⲣ̅ ⲟⲩⲟⲉⲓⲛ ⲉϫⲙ̅ ⲡⲕⲁϩ ⲁⲩⲱ ⲥⲉϫⲱⲕ’ ⲉⲃⲟⲗ ⲛ̅‐ <text:line-break/><text:span text:style-name="T1"> </text:span><text:span text:style-name="T2">(112/6) </text:span> ϩⲛ̅ⲥⲏⲙⲉⲓⲟⲛ ⲛ̅ⲭⲣⲟⲛⲟⲥ ⲙⲛ̅ ϩⲛ̅ⲕⲁⲓⲣⲟⲥ ⲙⲛ̅ <text:line-break/><text:span text:style-name="T1"> </text:span><text:span text:style-name="T2">(112/7) </text:span> ϩⲛ̅ⲣⲙ̅ⲡⲟⲟⲩⲉ ⲁⲩⲱ ϩⲛ̅ⲛⲉⲃⲁⲧⲉ ⲙⲛ̅ ϩⲛ̅ϩⲟⲟⲩ <text:line-break/><text:span text:style-name="T1"> </text:span><text:span text:style-name="T2">(112/8) </text:span> ⲙⲛ̅ ϩⲛ̅ⲟⲩϣⲏ ⲙⲛ̅ ϩⲛ̅ⲥⲟⲩⲥⲟⲩ ⲙⲛ̅ ⲡⲕⲉⲥⲉⲉⲡⲉ <text:line-break/><text:span text:style-name="T1"> </text:span><text:span text:style-name="T2">(112/9) </text:span> ⲧⲏⲣϥ’ ⲁⲩⲱ ⲛ̅ⲧⲉⲉⲓϩⲉ ⲁⲡⲙⲁ ⲧⲏⲣϥ’ ⲣ̅ⲕⲟⲥⲙⲉⲓ <text:line-break/><text:span text:style-name="T1"> </text:span><text:span text:style-name="T2">(112/10) </text:span> ϩⲓϫⲛ̅ ⲧⲡⲉ §ⲁⲇⲁⲙ’ ⲇⲉ ⲟⲩⲟⲉⲓⲛ’ ⲛ̅ⲧⲁⲣⲉϥ’ⲟⲩⲱϣ <text:line-break/><text:span text:style-name="T1"> </text:span><text:span text:style-name="T2">(112/11) </text:span> ⲁⲃⲱⲕ’ ⲉϩⲟⲩⲛ’ ⲉⲡⲉϥ’ⲟⲩⲟⲉⲓⲛ ⲉⲧⲉ ⲡⲁⲉⲓ ⲡⲉ <text:line-break/><text:span text:style-name="T1"> </text:span><text:span text:style-name="T2">(112/12) </text:span> ⲉⲧⲙⲁϩϣⲙⲟⲩⲛⲉ ⲙ̅ⲡⲉϥϣϭⲙ̅ϭⲟⲙ’ ⲉⲧⲃⲉ <text:line-break/><text:span text:style-name="T1"> </text:span><text:span text:style-name="T2">(112/13) </text:span> ⲧⲙⲛ̅ⲧϩⲏⲕⲉ ⲛ̅ⲧⲁⲧⲱϩ ⲙⲛ̅ ⲡⲉϥ’ⲟⲩⲟⲉⲓⲛ ⲧⲟⲧⲉ <text:line-break/><text:span text:style-name="T1"> </text:span><text:span text:style-name="T2">(112/14) </text:span> ⲁϥⲧⲁⲙⲉⲓⲟ ⲛⲁϥ’ ⲛ̅ⲟⲩⲛⲟϭ ⲛ̅ⲁⲓⲱⲛ ⲁⲩⲱ ϩⲙ̅ <text:line-break/><text:span text:style-name="T1"> </text:span><text:span text:style-name="T2">(112/15) </text:span> ⲡⲁⲓⲱⲛ’ ⲉⲧⲙ̅ⲙⲁⲩ ⲁϥⲧⲁⲙⲓⲟ ⲛ̅ⲥⲟⲟⲩ ⲛ̅ⲁⲓⲱⲛ <text:line-break/><text:span text:style-name="T1"> </text:span><text:span text:style-name="T2">(112/16) </text:span> ⲙⲛ̅ ⲛⲟⲩⲕⲟⲥⲙⲟⲥ ⲉⲩⲉⲓⲣⲉ ⲛ̅ⲥⲟⲟⲩ ⲉⲩⲥⲟⲧⲡ’ <text:line-break/><text:span text:style-name="T1"> </text:span><text:span text:style-name="T2">(112/17) </text:span> ⲁⲛⲙ̅ⲡⲏⲩⲉ ⲙ̅ⲡⲭⲁⲟⲥ ⲙⲛ̅ ⲛⲟⲩⲕⲟⲥⲙⲟⲥ ⲛ̅‐ <text:line-break/><text:span text:style-name="T1"> </text:span><text:span text:style-name="T2">(112/18) </text:span> ⲥⲁϣϥ’ ⲛ̅ⲕⲱⲃ §ⲛⲉⲉⲓⲁⲓⲱⲛ ⲇⲉ ⲧⲏⲣⲟⲩ ⲙⲛ̅ ⲛⲟⲩ‐ <text:line-break/><text:span text:style-name="T1"> </text:span><text:span text:style-name="T2">(112/19) </text:span> ⲕⲟⲥⲙⲟⲥ ⲉⲩϣⲟⲟⲡ’ ϩⲙ̅ ⲡⲉⲧⲉ ⲙⲛ̅ⲧⲉϥ ⲁⲣⲏϫϥ’ <text:line-break/><text:span text:style-name="T1"> </text:span><text:span text:style-name="T2">(112/20) </text:span> ⲉϥⲟⲩⲧⲉ ⲧⲙⲁϩϣⲙⲟⲩⲛⲉ ⲙⲛ̅ ⲡⲭⲁⲟⲥ ⲉⲧⲙ̅ⲡⲓ‐ <text:line-break/><text:span text:style-name="T1"> </text:span><text:span text:style-name="T2">(112/21) </text:span> ⲧⲛ̅ ⲙ̅ⲙⲟⲥ ⲉⲩⲏⲡ’ ⲙⲛ̅ ⲡⲕⲟⲥⲙⲟⲥ ⲉⲧⲉ ⲡⲁ ⲧ’‐ <text:line-break/><text:span text:style-name="T1"> </text:span><text:span text:style-name="T2">(112/22) </text:span> ⲙⲛ̅ⲧϩⲏⲕⲉ ⲡⲉ §ⲉϣϫⲉ ⲕⲟⲩⲱϣ ⲉⲉⲓⲙⲉ ⲛ̅ⲧⲇⲓⲁ‐ <text:line-break/><text:span text:style-name="T1"> </text:span><text:span text:style-name="T2">(112/23) </text:span> ⲑⲉⲥⲓⲥ ⲛ̅ⲛⲁⲉⲓ ⲕⲛⲁϩⲉ ⲉⲣⲟⲥ ⲉⲥⲥⲏϩ ϩⲙ̅ ⲡⲙⲁϩ‐ <text:line-break/><text:span text:style-name="T1"> </text:span><text:span text:style-name="T2">(112/24) </text:span> ⲥⲁϣϥ ⲛ̅ⲕⲟⲥⲙⲟⲥ ⲛ̅ϣⲓⲉⲣⲁⲗⲓⲁⲥ ⲡⲉⲡⲣⲟⲫⲏ‐ <text:line-break/><text:span text:style-name="T1"> </text:span><text:span text:style-name="T2">(112/25) </text:span> ⲧⲏⲥ §ϩⲁ ⲧⲉϩⲏ ⲇⲉ ⲙ̅ⲡⲁⲧⲉ ⲁⲇⲁⲙ ⲛ̅ⲟⲩⲟⲉⲓⲛ ⲣ̅‐ <text:line-break/><text:span text:style-name="T1"> </text:span><text:span text:style-name="T2">(112/26) </text:span> ⲁⲛⲁⲭⲱⲣⲉⲓ ϩⲙ̅ ⲡⲭⲟⲁⲥ ⲁⲛⲉⲝⲟⲩⲥⲓⲁ ⲛⲁⲩ ⲉ‐ <text:line-break/><text:span text:style-name="T1"> </text:span><text:span text:style-name="T2">(112/27) </text:span> ⲣⲟϥ’ ⲁⲩⲥⲱⲃⲉ ⲛ̅ⲥⲁ ⲡⲁⲣⲭⲓⲅⲉⲛⲉⲧⲱⲣ’ ϫⲉ ⲁϥ’‐ <text:line-break/><text:soft-page-break/><text:span text:style-name="T1"> </text:span><text:span text:style-name="T2">(112/28) </text:span> ϫⲉ ϭⲟⲗ ⲉϥϫⲱ ⲙ̅ⲙⲟⲥ ϫⲉ ⲁⲛⲟⲕ’ ⲡⲉ ⲡⲛⲟⲩ‐ <text:line-break/><text:span text:style-name="T1"> </text:span><text:span text:style-name="T2">(112/29) </text:span> ⲧⲉ ⲙⲗ̅ ⲗⲁⲁⲩ ϣⲟⲟⲡ’ ϩⲓ ⲧⲁⲉϩⲏ §ⲛ̅ⲧⲁⲣⲟⲩⲉⲓ ϣⲁ‐ <text:line-break/><text:span text:style-name="T1"> </text:span><text:span text:style-name="T2">(112/30) </text:span> ⲣⲟϥ’ ⲡⲉϫⲁⲩ ϫⲉ ⲙⲏ ⲡⲁⲉⲓ ⲡⲉ ⲡⲛⲟⲩⲧⲉ ⲛ̅ⲧⲁϩ‐ <text:line-break/><text:span text:style-name="T1"> </text:span><text:span text:style-name="T2">(112/31) </text:span> ⲧⲁⲕⲟ ⲙ̅ⲡⲛ̅ⲉⲣⲅⲟⲛ ⲁϥ’ⲟⲩⲱϣⲃ̅ ⲡⲉϫⲁϥ ϫⲉ <text:line-break/><text:span text:style-name="T1"> </text:span><text:span text:style-name="T2">(112/32) </text:span> ⲉϩⲉ’ ⲉϣϫⲉ ⲧⲉⲧⲛ̅ⲟⲩⲱϣ ϫⲉⲕⲁⲥ ⲛⲉϥ’ϣϭⲛ̅ <text:line-break/><text:span text:style-name="T1"> </text:span><text:span text:style-name="T2">(112/33) </text:span> ϭⲟⲙ ⲛ̅ⲧⲁⲕⲟ ⲙ̅ⲡⲛ̅ⲉⲣⲅⲟⲛ ⲁ̣ⲙⲏⲉⲓⲧⲛ̅ ⲙⲁⲣⲛ̅‐ <text:line-break/><text:span text:style-name="T1"> </text:span><text:span text:style-name="T2">(112/34) </text:span> ⲧⲁⲙⲉⲓⲟ ⲛ̅ⲟⲩⲣⲱⲙⲉ ⲉⲃⲟⲗ ϩⲙ̅ ⲡⲕⲁϩ ⲕⲁⲧⲁ <text:line-break/><text:span text:style-name="T1"> </text:span><text:span text:style-name="T2">(112/35) </text:span> ⲧϩⲓⲕⲱⲛ’ ⲙ̅ⲡⲛ̅ⲥⲱⲙⲁ’ ⲁⲩⲱ ⲕⲁⲧⲁ ⲡⲉⲓⲛⲉ <text:line-break/><text:span text:style-name="T1"> </text:span><text:span text:style-name="T2">(113/1) </text:span> ⲙ̅ⲡⲏ ⲛϥ̅ϣⲙ̅ϣⲉ ⲛⲁⲛ ϫⲉⲕⲁⲁⲥⲉ ⲡⲏ ⲉϥϣⲁⲛ‐ <text:line-break/><text:span text:style-name="T1"> </text:span><text:span text:style-name="T2">(113/2) </text:span> ⲛⲁⲩ ⲉⲡⲉϥ’ⲉⲓⲛⲉ ⲛ̅ϥⲙⲉⲣⲉⲓⲧϥ̅’ ⲟⲩⲕⲉⲧⲓ ϥⲛⲁ‐ <text:line-break/><text:span text:style-name="T1"> </text:span><text:span text:style-name="T2">(113/3) </text:span> ⲧⲁⲕⲟ ⲙ̅ⲡⲛ̅ⲉⲣⲅⲟⲛ ⲁⲗⲗⲁ ⲛⲉⲧⲟⲩⲛⲁϫⲡⲟⲟⲩ <text:line-break/><text:span text:style-name="T1"> </text:span><text:span text:style-name="T2">(113/4) </text:span> ⲉⲃⲟⲗ ϩⲙ̅ ⲡⲟⲩⲟⲉⲓⲛ ⲛ̅ⲧⲛ̅ⲁⲁⲩ ⲛ̅ϩⲙϩ̅ⲁ̅ⲗ̅ ⲛⲁⲛ <text:line-break/><text:span text:style-name="T1"> </text:span><text:span text:style-name="T2">(113/5) </text:span> ϩⲙ̅ ⲡⲭⲣⲟⲛⲟⲥ ⲧⲏⲣϥ̅ ⲙ̅ⲡⲉⲉⲓⲁⲓⲱⲛ §ⲡⲁⲉⲓ ⲇⲉ <text:line-break/><text:span text:style-name="T1"> </text:span><text:span text:style-name="T2">(113/6) </text:span> ⲧⲏⲣϥ’ ⲛ̅ⲧⲁϥ’ϣⲱⲡⲉ ⲕⲁⲧⲁ ⲧⲡⲣⲟⲛⲟⲓⲁ ⲛ̅ⲧⲡⲓ‐ <text:line-break/><text:span text:style-name="T1"> </text:span><text:span text:style-name="T2">(113/7) </text:span> ⲥⲧⲓⲥ ϣⲓⲛⲁ ⲉⲡⲣⲱⲙⲉ ⲛⲁⲟⲩⲱⲛϩ ⲉⲃⲟⲗ’ ⲛ̅‐ <text:line-break/><text:span text:style-name="T1"> </text:span><text:span text:style-name="T2">(113/8) </text:span> ⲛⲁϩⲣⲙ̅ ⲡⲉϥ’ⲉⲓⲛⲉ ⲛ̅ϥⲕⲁⲧⲁⲕⲣⲓⲛⲉ ⲙ̅ⲙⲟⲟⲩ <text:line-break/><text:span text:style-name="T1"> </text:span><text:span text:style-name="T2">(113/9) </text:span> ⲉⲃⲟⲗ ϩⲙ̅ ⲡⲟⲩⲡⲗⲁⲥⲙⲁ ⲁⲩⲱ ⲡⲟⲩⲡⲗⲁⲥⲙⲁ <text:line-break/><text:span text:style-name="T1"> </text:span><text:span text:style-name="T2">(113/10) </text:span> ⲁϥϣⲱⲡⲉ ⲛ̅ϫⲟⲗϫⲗ̅ ⲙ̅ⲡⲟⲩⲟⲉⲓⲛ §ⲧⲟⲧⲉ ⲛ̅ⲉ‐ <text:line-break/><text:span text:style-name="T1"> </text:span><text:span text:style-name="T2">(113/11) </text:span> ⲝⲟⲩⲥⲓⲁ ⲁⲩϫⲓ ⲛ̅ⲧⲅⲛⲱⲥⲓⲥ ⲁⲧⲣⲟⲩⲧⲁⲙⲓⲉ <text:line-break/><text:span text:style-name="T1"> </text:span><text:span text:style-name="T2">(113/12) </text:span> ⲡⲣⲱⲙⲉ ⲁⲥⲣ̅ ϣⲟⲣⲡ’ ⲉⲣⲟⲟⲩ ⲛ̅ϭⲓ ⲧⲥⲟⲫⲓⲁ <text:line-break/><text:span text:style-name="T1"> </text:span><text:span text:style-name="T2">(113/13) </text:span> ⲍⲱⲏ ⟦ⲉ⟧ ⲧⲁⲉⲓ ⲉⲧ’ϩⲁⲧⲛ̅ ⲥⲁⲃⲁⲱⲑ’ ⲁⲩⲱ ⲁⲥⲥⲱ‐ <text:line-break/><text:span text:style-name="T1"> </text:span><text:span text:style-name="T2">(113/14) </text:span> ⲃⲉ ⲛ̅ⲥⲁ ⲧⲟⲩⲅⲛⲱⲙⲏ ϫⲉ ϩⲛ̅ⲃⲗ̅ⲗⲉⲉⲩⲉ ⲛⲉ ϩⲛ̅ <text:line-break/><text:span text:style-name="T1"> </text:span><text:span text:style-name="T2">(113/15) </text:span> ⲟⲩⲙⲛ̅ⲧⲁⲧⲥⲟⲟⲩⲛ ⲁⲩⲧⲁⲙⲓⲟϥ’ ⲉⲣⲟⲟⲩ ⲟⲩⲁ‐ <text:line-break/><text:span text:style-name="T1"> </text:span><text:span text:style-name="T2">(113/16) </text:span> ⲁⲩ ⲁⲩⲱ ⲥⲉⲥⲟⲟⲩⲛ ⲁⲛ ϫⲉ ⲟⲩ ⲡⲉ ⲉⲧⲟⲩⲛⲁ‐ <text:line-break/><text:span text:style-name="T1"> </text:span><text:span text:style-name="T2">(113/17) </text:span> ⲁϥ’ §ⲇⲓⲁ ⲧⲟⲩⲧⲟ’ ⲁⲥⲣ̅ ϣⲟⲣⲡ’ ⲉⲣⲟⲟⲩ ⲁⲥⲧⲁⲙⲓⲟ <text:line-break/><text:span text:style-name="T1"> </text:span><text:span text:style-name="T2">(113/18) </text:span> ⲛ̅ϣⲟⲣⲡ’ ⲙ̅ⲡⲉⲥⲣⲱⲙⲉ ϣⲓⲛⲁ ⲉϥⲛⲁⲧⲁⲙⲉ <text:line-break/><text:span text:style-name="T1"> </text:span><text:span text:style-name="T2">(113/19) </text:span> ⲡⲟⲩⲡⲗⲁⲥⲙⲁ ⲛ̅ⲑⲉ ⲉϥⲛⲁⲣ̅ⲕⲁⲧⲁⲫⲣⲟⲛⲉⲓ ⲙ̅‐ <text:line-break/><text:span text:style-name="T1"> </text:span><text:span text:style-name="T2">(113/20) </text:span> ⲙⲟⲟⲩ ⲁⲩⲱ ⲛ̅ⲧⲉⲉⲓϩⲉ ϥⲛⲁⲛⲟⲩϩⲙ’ ⲉⲣⲟⲟⲩ <text:line-break/><text:span text:style-name="T1"> </text:span><text:span text:style-name="T2">(113/21) </text:span> §ⲡϫⲡⲟ ⲇⲉ ⲙ̅ⲡⲣⲉϥⲧⲁⲙⲟ ⲛ̅ⲧⲁϥϣⲱⲡⲉ ⲛ̅‐ <text:line-break/><text:span text:style-name="T1"> </text:span><text:span text:style-name="T2">(113/22) </text:span> ⲧⲉⲉⲓϩⲉ ⲧⲥⲟⲫⲓⲁ ⲛ̅ⲧⲁⲣⲉⲥⲛⲟⲩϫⲉ ⲛ̅ⲟⲩⲧⲗ̅‐ <text:line-break/><text:span text:style-name="T1"> </text:span><text:span text:style-name="T2">(113/23) </text:span> ϯⲗⲉ ⲟⲩⲟⲉⲓⲛ ⲁⲥϩⲁϯⲉ ⲉϫⲙ̅ ⲡⲙⲟⲟⲩ ⲛ̅ⲧⲉⲩ‐ <text:line-break/><text:span text:style-name="T1"> </text:span><text:span text:style-name="T2">(113/24) </text:span> ⲛⲟⲩ ⲁⲡⲣⲱⲙⲉ ⲟⲩⲱⲛϩ ⲉⲃⲟⲗ ⲉϥⲟ ⲛ̅ϩⲟⲩⲧ’‐ <text:line-break/><text:span text:style-name="T1"> </text:span><text:span text:style-name="T2">(113/25) </text:span> ⲥϩⲓⲙⲉ §ⲧⲗ̅ϯⲗⲉ ⲉⲧⲙ̅ⲙⲁⲩ ⲁⲥⲣ̅ⲧⲩⲡⲟⲩ ⲙ̅‐ <text:line-break/><text:span text:style-name="T1"> </text:span><text:span text:style-name="T2">(113/26) </text:span> ⲙⲟⲥ ϣⲟⲣⲡ’ ⲛ̅ⲛⲟⲩⲥⲱⲙⲁ ⲛ̅ⲥϩⲓⲙⲉ ⲙ̅‐ <text:line-break/><text:span text:style-name="T1"> </text:span><text:span text:style-name="T2">(113/27) </text:span> ⲙⲛ̅ⲛ̅ⲥⲱⲥ ⲁⲥⲣ̅ⲧⲩⲡⲟⲩ ⲙ̅ⲙⲟⲥ ϩⲙ̅ ⲡⲥⲱ‐ <text:line-break/><text:span text:style-name="T1"> </text:span><text:span text:style-name="T2">(113/28) </text:span> ⲙⲁ ⲙ̅ⲡⲉⲓⲛⲉ ⲛ̅ⲧⲙⲁⲁⲩ ⲛ̅ⲧⲁϩⲟⲩⲱⲛϩ ⲉⲃⲟⲗ <text:line-break/><text:span text:style-name="T1"> </text:span><text:span text:style-name="T2">(113/29) </text:span> ⲁⲥϫⲟⲕⲥ̅ ⲉⲃⲟⲗ ϩⲓⲧⲛ̅ ⲙⲛ̅ⲧⲥⲛⲟⲟⲩⲥ ⲛ̅ⲉⲃⲟⲧ’ <text:line-break/><text:span text:style-name="T1"> </text:span><text:span text:style-name="T2">(113/30) </text:span> ⲁⲩϫⲡⲟ ⲛ̅ⲟⲩⲣⲱⲙⲉ ⲛ̅ϩⲟⲩⲧ’ⲥϩⲓⲙⲉ ⲡⲁⲉⲓ <text:line-break/><text:span text:style-name="T1"> </text:span><text:span text:style-name="T2">(113/31) </text:span> ⲉⲛϩⲉⲗⲗⲏⲛ ⲙⲟⲩⲧⲉ ⲉⲣⲟϥ ϫⲉ ϩⲉⲣⲙⲁⲫⲣⲟ‐ <text:line-break/><text:span text:style-name="T1"> </text:span><text:span text:style-name="T2">(113/32) </text:span> ⲇⲓⲧⲏⲥ ⲧⲉ̣ϥⲙⲁⲁⲩ ⲛ̅ⲇⲉ ⲛ̅ϩⲉⲃⲣⲁⲓⲟⲥ ⲙⲟⲩ‐ <text:line-break/><text:span text:style-name="T1"> </text:span><text:span text:style-name="T2">(113/33) </text:span> ⲧⲉ ⲉⲣⲟⲥ ϫⲉ ⲉ̣ⲩϩⲁ ⲛ̅ⲍⲱⲏ ⲉⲧⲉ ⲧⲣⲉϥⲧⲁⲙⲟ <text:line-break/><text:span text:style-name="T1"> </text:span><text:span text:style-name="T2">(113/34) </text:span> ⲧⲉ ⲙ̅ⲡⲱⲛϩ §ⲡⲉⲥϣⲏⲣⲉ ⲇⲉ ⲡⲉ ⲡϫⲡⲟ <text:line-break/><text:span text:style-name="T1"> </text:span><text:span text:style-name="T2">(113/35) </text:span> ⲉⲧⲟ ⲛ̅ϫⲟⲉⲓⲥ ⲙ̅ⲙⲛ̅ⲛ̅ⲥⲱⲥ’ ⲁⲛ[ⲉ]ⲝⲟⲩⲥⲓⲁ <text:line-break/><text:span text:style-name="T1"> </text:span><text:span text:style-name="T2">(114/1) </text:span> ⲙⲟⲩⲧⲉ ⲉⲣⲟϥ’ ϫⲉ ⲡⲑⲏⲣⲓⲟⲛ ⲁⲧⲣⲉϥⲣ̅ⲡⲗⲁⲛⲁ <text:line-break/><text:span text:style-name="T1"> </text:span><text:span text:style-name="T2">(114/2) </text:span> ⲛ̅ⲛⲟⲩⲡⲗⲁⲥⲙⲁ ⲑⲉⲣⲙⲏⲛⲉⲓⲁ ⲙ̅ⲡⲑⲏⲣⲓⲟⲛ’ <text:line-break/><text:span text:style-name="T1"> </text:span><text:span text:style-name="T2">(114/3) </text:span> ⲡⲉ ⲡⲣⲉϥ’ⲧⲁⲙⲟ ⲁⲩϩⲉ ⲅⲁⲣ’ ⲉⲣⲟϥ’ ⲉϥⲟ ⲛ̅ⲥⲁⲃⲉ <text:line-break/><text:span text:style-name="T1"> </text:span><text:span text:style-name="T2">(114/4) </text:span> ⲡⲁⲣⲁⲣⲟⲟⲩ ⲧⲏⲣⲟⲩ §ⲉⲩϩⲁ ϭⲉ ⲧⲉ ⲧϣⲟⲣⲡ’ ⲙ̅‐ <text:line-break/><text:soft-page-break/><text:span text:style-name="T1"> </text:span><text:span text:style-name="T2">(114/5) </text:span> ⲡⲁⲣⲑⲉⲛⲟⲥ ⲧⲁⲉⲓ ⲁϫⲛ̅ ϩⲟⲟⲩⲧ’ ⲁⲥϣⲁⲙⲓⲥⲉ <text:line-break/><text:span text:style-name="T1"> </text:span><text:span text:style-name="T2">(114/6) </text:span> ⲛ̅ⲧⲟⲥ ⲡⲉ ⲛ̅ⲧⲁϩⲣ̅ ⲥⲟⲉⲓⲛ ⲉⲣⲟⲥ ⲟⲩⲁⲁⲧⲥ̅ §ⲇⲓⲁ <text:line-break/><text:span text:style-name="T1"> </text:span><text:span text:style-name="T2">(114/7) </text:span> ⲧⲟⲩⲧⲟ ⲥⲉϫⲱ ⲙ̅ⲙⲟⲥ ⲉⲣⲟⲥ ϫⲉ ⲁⲥϫⲟⲟⲥ ϫⲉ ⲁ‐ <text:line-break/><text:span text:style-name="T1"> </text:span><text:span text:style-name="T2">(114/8) </text:span> ⲛⲟⲕ ⲡⲉ ⲡⲙⲉⲣⲟⲥ ⲛ̅ⲧⲁⲙⲁⲁⲩ ⲁⲩⲱ ⲁⲛⲟⲕ’ ⲧⲉ <text:line-break/><text:span text:style-name="T1"> </text:span><text:span text:style-name="T2">(114/9) </text:span> ⲧⲙⲁⲁⲩ’ ⲁⲛⲟⲕ’ ⲧⲉ ⲧϩⲓⲙⲉ ⲁⲛⲟⲕ’ ⲧⲉ ⲧⲡⲁⲣⲑⲉⲛⲟⲥ <text:line-break/><text:span text:style-name="T1"> </text:span><text:span text:style-name="T2">(114/10) </text:span> ⲁⲛⲟⲕ’ ⲧⲉⲧⲉⲉⲧ’ ⲁⲛⲟⲕ’ ⲧⲉ ⲧ’ⲥⲟⲉⲓⲛ ⲁⲛⲟⲕ’ ⲧⲉ ⲧⲣⲉϥ’‐ <text:line-break/><text:span text:style-name="T1"> </text:span><text:span text:style-name="T2">(114/11) </text:span> ⲥⲟⲗⲥⲗ̅ ⲛ̅ⲛ̅ⲛⲁⲕⲉ ⲡⲁϩⲁⲉⲓ ⲡⲉⲛⲧⲁϩϫⲡⲟⲉⲓ ⲁⲩ‐ <text:line-break/><text:span text:style-name="T1"> </text:span><text:span text:style-name="T2">(114/12) </text:span> ⲱ ⲁⲛⲟⲕ’ ⲧⲉ ⲧⲉϥ’ⲙⲁⲁⲩ ⲁⲩⲱ ⲛ̅ⲧⲟϥ’ ⲡⲉ ⲡⲁⲉⲓⲱⲧ’ <text:line-break/><text:span text:style-name="T1"> </text:span><text:span text:style-name="T2">(114/13) </text:span> ⲁⲩⲱ ⲡⲁϫⲟⲉⲓⲥ ⲛ̅ⲧⲟϥ’ ⲡⲉ ⲧⲁϭⲟⲙ’ ⲡⲉⲧϥ’ⲟⲩ‐ <text:line-break/><text:span text:style-name="T1"> </text:span><text:span text:style-name="T2">(114/14) </text:span> ⲁϣϥ̅ ϥϫⲱ ⲙ̅ⲙⲟϥ’ ⲉⲩⲗⲟⲅⲱⲥ ϯϣⲱⲡⲉ ⲁⲗ‐ <text:line-break/><text:span text:style-name="T1"> </text:span><text:span text:style-name="T2">(114/15) </text:span> ⲗⲁϩⲓϫⲡⲉ ⲟⲩⲣⲱⲙⲉ ⲛ̅ϫⲟⲉⲓⲥ §ⲛⲁⲉⲓ ⲇⲉ ϩⲙ̅ ⲡⲟⲩ‐ <text:line-break/><text:span text:style-name="T1"> </text:span><text:span text:style-name="T2">(114/16) </text:span> ⲱϣ 〈 ʹ26 〉 ⲁⲩϭⲱⲗⲡ’ ⲉⲃⲟⲗ’ ⲛⲙ̅ⲯⲩⲭⲏ ⲛ̅ⲥⲁⲃⲁⲱⲑ’ <text:line-break/><text:span text:style-name="T1"> </text:span><text:span text:style-name="T2">(114/17) </text:span> ⲙⲛ̅ ⲡⲉϥⲭ̅ⲥ̅ ⟦.⟧ ⲛⲁⲉⲓ ⲉⲧⲛ̅ⲛⲏⲩ ⲁ’ⲙⲡⲗⲁⲥⲙⲁ <text:line-break/><text:span text:style-name="T1"> </text:span><text:span text:style-name="T2">(114/18) </text:span> ⲛ̅ⲉⲝⲟⲩⲥⲓⲁ ⲁⲩⲱ ⲉⲧⲃⲉ ⲛⲁⲉ’ⲓ ⲁⲧⲉⲥⲙⲏ ⲉⲧⲟⲩⲁⲁ’ⲃ <text:line-break/><text:span text:style-name="T1"> </text:span><text:span text:style-name="T2">(114/19) </text:span> ϫⲟⲟⲥ ϫⲉ ⲁϣⲁⲉⲓ ⲁⲩⲱ ⲛ̅ⲧⲉⲧⲛ̅ⲁⲛⲁⲉ’ⲓ ⲉⲣⲓ ϫⲟ‐ <text:line-break/><text:span text:style-name="T1"> </text:span><text:span text:style-name="T2">(114/20) </text:span> ⲉⲓⲥ ⲉϫⲛ̅ ⲛ̅ⲥⲱⲛ’ⲧ ⲧⲏⲣⲟⲩ ⲁⲩⲱ ⲛⲁⲉⲓ ⲛⲉ ⲛ̅ⲧⲁⲩ‐ <text:line-break/><text:span text:style-name="T1"> </text:span><text:span text:style-name="T2">(114/21) </text:span> ⲣ̅ⲁⲓⲭⲙⲁⲗⲱⲧⲓⲍⲉ ⲙ̅ⲙⲟⲟⲩ ⲕⲁⲧⲁ ⲕⲗⲏⲣⲟⲥ ⲉ‐ <text:line-break/><text:span text:style-name="T1"> </text:span><text:span text:style-name="T2">(114/22) </text:span> ⲃⲟⲗ ϩⲓⲧⲛ̅ ⲡⲁⲣⲭⲓⲅⲉⲛⲉⲧⲱ’ⲣ ⲁⲩⲱ ⲛ̅ⲧⲉⲉⲓϩⲉ <text:line-break/><text:span text:style-name="T1"> </text:span><text:span text:style-name="T2">(114/23) </text:span> ⲁⲩⲟ’ⲧⲡⲟⲩ ⲉϩⲟⲩⲛ ⲉⲛϣⲧⲉⲕⲱⲟⲩ ⲛ̅ⲛ̅ⲡⲗⲁⲥ‐ <text:line-break/><text:span text:style-name="T1"> </text:span><text:span text:style-name="T2">(114/24) </text:span> ⲙⲁ † ⲏ ϩⲛ̅ ⲧⲥⲩ’ⲛⲧⲉⲗⲉⲓⲁ ⲙ̅ⲡⲁⲓⲱⲛ † §ϩⲙ̅ ⲡⲕⲁⲓ‐ <text:line-break/><text:span text:style-name="T1"> </text:span><text:span text:style-name="T2">(114/25) </text:span> ⲣⲟⲥ ⲇⲉ ⲉⲧⲙ̅ⲙⲁⲩ ⲧⲟⲧⲉ ⲁⲡⲁⲣⲭⲓⲅⲉⲛⲉⲧⲱⲣ <text:line-break/><text:span text:style-name="T1"> </text:span><text:span text:style-name="T2">(114/26) </text:span> ⲁϥϯ ⲟⲩⲅⲛⲱⲙⲏ ⲛ̅ⲛⲉⲧⲛ̅ⲙ̅ⲙ’ⲁϥ ⲉⲧⲃⲉ ⲡⲣⲱ‐ <text:line-break/><text:span text:style-name="T1"> </text:span><text:span text:style-name="T2">(114/27) </text:span> ⲙⲉ ⲧⲟⲧⲉ ⲁⲡⲟⲩⲁ ⲡⲟⲩⲁ ⲛ̅ϩⲏⲧⲟⲩ ⲛⲟⲩϫⲉ <text:line-break/><text:span text:style-name="T1"> </text:span><text:span text:style-name="T2">(114/28) </text:span> ⲙ̅ⲡ’ⲉϥⲥⲡⲉⲣⲙⲁ ⲉϫⲛ̅ ⲧⲙⲏⲧⲉ ⲛ̅ⲑϩⲗ̅ⲡⲉ ⲙ̅‐ <text:line-break/><text:span text:style-name="T1"> </text:span><text:span text:style-name="T2">(114/29) </text:span> ⲡⲕⲁϩ §ϫⲓⲙ ⲫⲟⲟⲩ ⲉⲧⲙ̅ⲙⲁⲩ ⲁⲡⲥⲁϣϥ ⲛ̅ⲁ’ⲣ‐ <text:line-break/><text:span text:style-name="T1"> </text:span><text:span text:style-name="T2">(114/30) </text:span> ⲭⲱⲛ ⲣ̅ⲡⲗⲁⲥⲥⲉ ⲙ̅ⲡⲣⲱⲙⲉ ⲉⲡⲉϥⲥⲱⲙⲁ <text:line-break/><text:span text:style-name="T1"> </text:span><text:span text:style-name="T2">(114/31) </text:span> ⲙⲉⲛ ⲉⲓⲛⲉ ⲙ̅ⲡⲟⲩⲥⲱⲙⲁ ⲡ’ⲉϥⲉⲓⲛⲉ ⲇⲉ ’ⲉϥ‐ <text:line-break/><text:span text:style-name="T1"> </text:span><text:span text:style-name="T2">(114/32) </text:span> ⲉⲓⲛⲉ ⲙ̅ⲡⲣⲱⲙⲉ ⲛ̅ⲧⲁϩⲟⲩⲱⲛϩ ⲉⲃⲟⲗ ⲛⲁⲩ <text:line-break/><text:span text:style-name="T1"> </text:span><text:span text:style-name="T2">(114/33) </text:span> ⲡⲉϥⲡⲗⲁⲥⲙⲁ ⲁϥϣⲱⲡⲉ ⲕ[ⲁ]ⲧⲁ ⲙⲉⲣⲟⲥ ⲙ̅‐ <text:line-break/><text:span text:style-name="T1"> </text:span><text:span text:style-name="T2">(114/34) </text:span> ⲡⲟⲩⲁ ⲡⲟⲩⲁ ⲡⲟⲩⲛⲟϭ ⲇⲉ ⲁϥⲧⲁⲙⲉⲓⲉ <text:line-break/><text:span text:style-name="T1"> </text:span><text:span text:style-name="T2">(114/35) </text:span> ⲡⲉⲅⲕⲉⲫⲁ̣ⲗⲛ ⲙⲛ̅ ⲡⲁⲧⲕⲁⲥ §ⲙ̅ⲙⲛ̅ⲛ̅ⲥⲱⲥ <text:line-break/><text:span text:style-name="T1"> </text:span><text:span text:style-name="T2">(114/36) </text:span> † ⲁϥ̣ⲟ̣ⲩ̣ⲱⲛϩ ⲉⲃⲟⲗ ϩⲱⲥ ⲁⲧ’ⲉϥⲉϩⲏ † ⲁϥϣⲱⲡⲉ <text:line-break/><text:span text:style-name="T1"> </text:span><text:span text:style-name="T2">(115/1) </text:span> ⲛ̅ⲟⲩⲣⲱⲙⲉ ⲙ̅ⲯⲩⲭⲓⲕⲟⲥ ⲁⲩⲱ ⲁⲩⲙⲟⲩⲧⲉ ⲉ‐ <text:line-break/><text:span text:style-name="T1"> </text:span><text:span text:style-name="T2">(115/2) </text:span> ⲣ’ⲟϥ ϫⲉ ⲁⲇⲁ’ⲙ ⲉⲧⲉ ⲡⲁⲉⲓ ⲡⲉ ⲡⲉⲓⲱ’ⲧ ⲕⲁⲧⲁ <text:line-break/><text:span text:style-name="T1"> </text:span><text:span text:style-name="T2">(115/3) </text:span> ⲡⲣⲁⲛ ⲙ̅ⲡⲉ’ⲧϩⲓ ⲧ’ⲉϥⲉϩⲏ §ⲛ̅ⲧⲁⲣⲟⲩϫⲱⲕ ⲇⲉ ⲛ̅‐ <text:line-break/><text:span text:style-name="T1"> </text:span><text:span text:style-name="T2">(115/4) </text:span> ⲁⲇⲁ’ⲙ ⲁϥⲕⲁⲁϥ ⲛ̅ⲛⲟⲩⲥⲕⲉⲩⲟⲥ ⲉⲁϥϫⲓ ⲙⲟⲣ‐ <text:line-break/><text:span text:style-name="T1"> </text:span><text:span text:style-name="T2">(115/5) </text:span> ⲫⲏ ⲛ̅ⲑⲉ ⲛ̅ⲛⲓϩⲟⲩϩⲉ ⲉⲙⲛ̅ ⲡⲛⲉⲩⲙⲁ ⲛ̅ϩⲏ’ⲧϥ <text:line-break/><text:span text:style-name="T1"> </text:span><text:span text:style-name="T2">(115/6) </text:span> ⲉⲧⲃⲉ ⲡⲉⲉⲓϩⲱⲃ ⲛ̅ⲧⲁⲣⲉ ⲡⲛⲟϭ ⲛ̅ⲁⲣⲭⲱⲛ <text:line-break/><text:span text:style-name="T1"> </text:span><text:span text:style-name="T2">(115/7) </text:span> ⲣ̅ ⲡⲙⲉⲉⲩⲉ ⲙ̅ⲡϣⲁϫⲉ ⲛ̅ⲧⲡⲓⲥⲧⲓⲥ ⲁϥⲣ̅ ϩⲟⲧⲉ <text:line-break/><text:span text:style-name="T1"> </text:span><text:span text:style-name="T2">(115/8) </text:span> ⲙⲏⲡⲱⲥ ⲛ̅ϥⲓ ⲛ̅ϭⲓ ⲡⲣⲙ̅ⲙ̅ⲙⲉ ⲉϩⲟⲩ’ⲛ ⲉⲡ’ⲉϥ‐ <text:line-break/><text:span text:style-name="T1"> </text:span><text:span text:style-name="T2">(115/9) </text:span> ⲡⲗⲁⲥⲙⲁ ⲛ̅ϥⲣ̅ ϫⲟⲉⲓⲥ ⲉϫⲱϥ%2 §ⲉⲧⲃⲉ ⲡⲁⲉⲓ ’ⲁϥ‐ <text:line-break/><text:span text:style-name="T1"> </text:span><text:span text:style-name="T2">(115/10) </text:span> ⲕⲱ ⲙ̅ⲡⲉϥⲡⲗⲁⲥⲙⲁ ⲛ̅ϩⲙⲉ ⲛ̅ϩⲟⲟⲩ ⲭⲱⲣⲓⲥ̣ <text:line-break/><text:span text:style-name="T1"> </text:span><text:span text:style-name="T2">(115/11) </text:span> ⲯⲩⲭⲏ ⲁⲩⲱ ’ⲁϥⲁⲛⲁⲭⲱⲣⲉⲓ ⲁϥⲕⲁ’ⲁϥ ϩⲙ̣̅ ⲡⲙ̣[ⲁϩ]‐ <text:line-break/><text:span text:style-name="T1"> </text:span><text:span text:style-name="T2">(115/12) </text:span> ϩⲙⲉ ⲇⲉ ⲛ̅ϩⲟⲟⲩ ⲁⲧⲥⲟⲫⲓⲁ ⲛ̅ⲍⲱⲏ ⲧⲛ̅ⲛⲟⲟⲩ <text:line-break/><text:span text:style-name="T1"> </text:span><text:span text:style-name="T2">(115/13) </text:span> ⲙ̅ⲡⲉⲥⲛⲓϥⲉ ⲉϩⲟⲩⲛ ⲁⲁⲇⲁⲙ ⲡⲁⲉⲓ ⲉⲧⲉ ⲙⲛ̅ <text:line-break/><text:span text:style-name="T1"> </text:span><text:span text:style-name="T2">(115/14) </text:span> ⲯⲩⲭⲏ ⲙ̅ⲙ’ⲟϥ ⲁϥⲁⲣⲭⲉⲓ ⲛ̅ⲕⲓⲙ ϩⲓϫⲙ̅ ⲡⲕⲁϩ <text:line-break/><text:span text:style-name="T1"> </text:span><text:span text:style-name="T2">(115/15) </text:span> ⲁⲩⲱ ⲙ̅ⲡⲉϥϣϭⲙ̅ ϭⲟ’ⲙ ⲉⲧⲱⲟⲩⲛ §ⲡⲥⲁϣϥ̅ <text:line-break/><text:soft-page-break/><text:span text:style-name="T1"> </text:span><text:span text:style-name="T2">(115/16) </text:span> ⲇⲉ ⲛ̅ⲁⲣⲭⲱⲛ ⲛ̅ⲧⲁⲣⲟⲩⲉⲓ ⲁⲩⲛⲁⲩ ⲉⲣ’ⲟϥ ⲁⲩ‐ <text:line-break/><text:span text:style-name="T1"> </text:span><text:span text:style-name="T2">(115/17) </text:span> ϣⲧⲟⲣⲧⲣ̅ ⲉⲙⲁⲧⲉ ⲁⲩϯ ⲡⲉⲩⲟⲩⲟⲉⲓ ⲉϩⲟⲩⲛ ⲉ‐ <text:line-break/><text:span text:style-name="T1"> </text:span><text:span text:style-name="T2">(115/18) </text:span> ⲣ’ⲟϥ ⲁⲩⲉⲙⲁϩⲧⲉ ⲙ̅ⲙ’ⲟϥ ⲁⲩⲱ ⲡⲉϫ’ⲁϥ ⲙ̅‐ <text:line-break/><text:span text:style-name="T1"> </text:span><text:span text:style-name="T2">(115/19) </text:span> ⲡⲛⲓϥⲉ ⲉⲧⲛ̅ϩⲏⲧϥ̅ ϫⲉ ⲛ̅ⲧⲟ’ⲕ ⲛⲓ’ⲙ ⲁⲩⲱ ⲛ̅‐ <text:line-break/><text:span text:style-name="T1"> </text:span><text:span text:style-name="T2">(115/20) </text:span> ⲧⲟ’ⲕⲉⲓ ⲉⲃⲟⲗ ⲧⲱⲛ ⲉⲛⲓⲙⲁ ’ⲁϥⲟⲩⲱϣⲃ̅ <text:line-break/><text:span text:style-name="T1"> </text:span><text:span text:style-name="T2">(115/21) </text:span> ⲡⲉϫ’ⲁϥ ϫⲉ ⲛ̅ⲧⲁⲉⲓⲉⲓ ⲉⲃⲟⲗ ϩⲓⲧⲛ̅ ⲧⲇⲩⲛⲁ‐ <text:line-break/><text:span text:style-name="T1"> </text:span><text:span text:style-name="T2">(115/22) </text:span> ⲙⲓⲥ ⲙ̅ⲡⲣⲱⲙⲉ ⲉⲧⲃⲉ ⲡⲧⲁⲕⲟ ⲙ̅ⲡⲉⲧⲛ̅ⲉⲣ‐ <text:line-break/><text:span text:style-name="T1"> </text:span><text:span text:style-name="T2">(115/23) </text:span> ⲅⲟⲛ §〈 ʹ26 〉 ⲛ̅ⲧⲁⲣⲟⲩⲥⲱⲧⲙ̅ ⲁⲩϯ ⲉⲟⲟⲩ ⲛ’ⲁϥ ϫⲉ ⲁϥ‐ <text:line-break/><text:span text:style-name="T1"> </text:span><text:span text:style-name="T2">(115/24) </text:span> ϯ ⲛⲁⲩ ⲙ̅ⲧⲟⲛ ⲉⲑⲣ̅ⲧⲉ ⲙⲛ̅ ⲡⲣⲟⲟⲩϣ ⲉⲧⲟⲩⲛ̅‐ <text:line-break/><text:span text:style-name="T1"> </text:span><text:span text:style-name="T2">(115/25) </text:span> ϩⲏ’ⲧϥ ⲧⲟⲧⲉ ⲁⲩⲙⲟⲩⲧⲉ ⲉⲫⲟⲟⲩ ⲉⲧⲙ̅ⲙⲁⲩ <text:line-break/><text:span text:style-name="T1"> </text:span><text:span text:style-name="T2">(115/26) </text:span> ϫⲉ ⲧⲁⲛⲁⲡⲁⲩⲥⲓⲥ ϫⲉ ⲁⲩⲙ̅ⲧⲟⲛ ⲙ̅ⲙⲟⲟⲩ <text:line-break/><text:span text:style-name="T1"> </text:span><text:span text:style-name="T2">(115/27) </text:span> ⲉⲃⲟⲗ ϩⲛ̅ ⲟⲩϩⲓⲥⲉ §ⲛ̅ⲧⲉⲣⲟⲩⲛⲁⲩ ⲇⲉ ⲉⲁⲇⲁ’ⲙ <text:line-break/><text:span text:style-name="T1"> </text:span><text:span text:style-name="T2">(115/28) </text:span> ϫⲉ ⲙ̅ⲡⲉϥϣⲧⲱⲟⲩⲛ ⲁⲩⲣⲁϣⲉ ⲁⲩϥⲓ’ⲧϥ <text:line-break/><text:span text:style-name="T1"> </text:span><text:span text:style-name="T2">(115/29) </text:span> ⲁⲩⲕⲁⲁϥ ϩⲙ̅ ⲡⲡⲁⲣⲁⲇⲉⲓⲥⲟⲥ ⲁⲩⲱ ⲁⲩⲣ̅ⲁ‐ <text:line-break/><text:span text:style-name="T1"> </text:span><text:span text:style-name="T2">(115/30) </text:span> ⲛⲁⲭⲱⲣⲉⲓ ⲉϩⲣⲁⲓ̈ ⲉⲛⲟⲩⲙ̅ⲡⲏⲩⲉ §ⲙⲛ̅ⲛ̅‐ <text:line-break/><text:span text:style-name="T1"> </text:span><text:span text:style-name="T2">(115/31) </text:span> ⲥⲁ ⲡϩⲟⲟⲩ ⲛ̅ⲧⲁⲛⲁⲡⲁⲩⲥⲓⲥ ⲁⲧⲥⲟⲫⲓⲁ <text:line-break/><text:span text:style-name="T1"> </text:span><text:span text:style-name="T2">(115/32) </text:span> ϫⲟⲟⲩ ⲛ̅ⲍⲱⲏ ⲧⲉⲥϣⲉⲉⲣⲉ ⲉⲩⲙⲟⲩⲧⲉ <text:line-break/><text:span text:style-name="T1"> </text:span><text:span text:style-name="T2">(115/33) </text:span> ⲉⲣⲟⲥ ϫⲉ ⲉ̣ⲩϩⲁ ϩⲱⲥ ⲣ’ⲉϥⲧⲁⲙⲟ ⲁⲧⲣⲉⲥ‐ <text:line-break/><text:span text:style-name="T1"> </text:span><text:span text:style-name="T2">(115/34) </text:span> ⲧⲟⲩⲛⲟⲥ ⲁⲇⲁ’ⲙ ⲡⲁⲉⲓ ⲉⲙⲛ̅ ⲯⲩⲭⲏ ⲛ̅ϩⲏⲧϥ̅ <text:line-break/><text:span text:style-name="T1"> </text:span><text:span text:style-name="T2">(115/35) </text:span> ϫⲉⲕⲁⲁⲥ ⲛⲉⲧⲉϥⲛⲁϫⲡⲟⲟⲩ [ⲉ]ⲩⲛⲁϣⲱ‐ <text:line-break/><text:span text:style-name="T1"> </text:span><text:span text:style-name="T2">(115/36) </text:span> ⲡⲉ ⲛ̅ⲁⲅⲅⲉⲓⲟⲛ ⲙ̅ⲡⲟⲩⲟ̣[ⲉⲓ’ⲛ §ⲛ̅ⲧ]ⲁ̣[ⲣ]ⲉ <text:line-break/><text:span text:style-name="T1"> </text:span><text:span text:style-name="T2">(116/1) </text:span> ⲉⲩϩⲁ ⲛⲁⲩ ⲉⲡⲉⲥϣⲃⲣ̅ⲉⲓⲛⲉ ⲉϥⲛ’ⲏϫ ⲁⲥϣⲛ̅ <text:line-break/><text:span text:style-name="T1"> </text:span><text:span text:style-name="T2">(116/2) </text:span> ϩⲧⲏⲥ ϩⲁⲣ’ⲟϥ ⲁⲩⲱ ⲡⲉϫⲁⲥ ϫⲉ ⲁⲇⲁ’ⲙ ⲱⲛϩ <text:line-break/><text:span text:style-name="T1"> </text:span><text:span text:style-name="T2">(116/3) </text:span> ⲧⲱⲟⲩⲛ ϩⲓϫⲙ̅ ⲡⲕⲁϩ ⲛ̅ⲧⲉⲩⲛⲟⲩ ⲁⲡⲉⲥϣⲁ‐ <text:line-break/><text:span text:style-name="T1"> </text:span><text:span text:style-name="T2">(116/4) </text:span> ϫⲉ ϣⲱⲡⲉ ⲛ̅ⲟⲩⲉⲣⲅⲟⲛ ⲛ̅ⲧⲁⲣⲉ ⲁⲇⲁⲙ ⲅⲁ’ⲣ <text:line-break/><text:span text:style-name="T1"> </text:span><text:span text:style-name="T2">(116/5) </text:span> ⲧⲱⲟⲩⲛ ⲛ̅ⲧⲉⲩⲛⲟⲩ ⲁϥⲟⲩⲉ’ⲛ ⲛ̅ⲛⲉϥⲃⲁ’ⲗ <text:line-break/><text:span text:style-name="T1"> </text:span><text:span text:style-name="T2">(116/6) </text:span> ⲛ̅ⲧⲁⲣⲉϥⲛⲁⲩ ⲉⲣⲟⲥ ⲡⲉϫⲁϥ ϫⲉ ⲛ̅ⲧⲟ ⲉⲩⲛⲁⲙⲟⲩ‐ <text:line-break/><text:span text:style-name="T1"> </text:span><text:span text:style-name="T2">(116/7) </text:span> ⲧⲉ ⲉⲣⲟ ϫⲉ ⲧⲙⲁⲁⲩ ⲛ̅ⲛⲉⲧⲟⲛϩ ϫⲉ ⲛ̅ⲧⲟ ⲡⲉⲧⲁϩ‐ <text:line-break/><text:span text:style-name="T1"> </text:span><text:span text:style-name="T2">(116/8) </text:span> ϯ ⲛⲁⲉⲓ ⲙ̅ⲡⲱⲛϩ §ⲧⲟⲧⲉ ⲁⲩⲧⲁⲙⲉ ⲛ̅ⲉⲝⲟⲩⲥⲓ’ⲁ <text:line-break/><text:span text:style-name="T1"> </text:span><text:span text:style-name="T2">(116/9) </text:span> ϫⲉ ⲡⲟⲩⲡⲗⲁⲥⲙⲁ ⲟⲛ’ϩ ⲁⲩⲱ ⲁϥⲧⲱⲟⲩⲛ ⲁⲩ‐ <text:line-break/><text:span text:style-name="T1"> </text:span><text:span text:style-name="T2">(116/10) </text:span> ϣⲧⲟⲣⲧⲣ̅ ⲉⲙⲁⲧ’ⲉ ⲁⲩϫⲟⲟⲩ ⲥⲁ’ϣϥ ⲛ̅ⲁⲣⲭⲁ’ⲅ‐ <text:line-break/><text:span text:style-name="T1"> </text:span><text:span text:style-name="T2">(116/11) </text:span> ⲅⲉⲗⲟⲥ ⲁⲧⲣⲟⲩⲛⲁⲩ ⲉⲡⲉⲛⲧⲁϩϣⲱⲡⲉ §ⲁⲩⲉⲓ <text:line-break/><text:span text:style-name="T1"> </text:span><text:span text:style-name="T2">(116/12) </text:span> ϣⲁ ⲁⲇⲁⲙ ⲛ̅ⲧⲁⲣⲟⲩⲛⲁⲩ ⲉⲉⲩϩⲁ ⲉⲥϣⲁϫⲉ ⲛⲙ̅‐ <text:line-break/><text:span text:style-name="T1"> </text:span><text:span text:style-name="T2">(116/13) </text:span> ⲙ’ⲁϥ ⲡⲉϫⲁⲩ ⲛ̅ⲛⲟⲩⲉⲣⲏⲩ ϫⲉ ⲟⲩⲟⲩ ⲧⲉ ⲧⲉⲉⲓⲣⲙ̅‐ <text:line-break/><text:span text:style-name="T1"> </text:span><text:span text:style-name="T2">(116/14) </text:span> ⲟⲩⲟⲉⲓⲛ ⲕⲁⲓ ⲅⲁⲣ ⲉⲥⲓⲛⲉ ⲙ̅ⲡⲓⲉⲛⲉ ⲛ̅ⲧⲁϩⲟⲩ‐ <text:line-break/><text:span text:style-name="T1"> </text:span><text:span text:style-name="T2">(116/15) </text:span> ⲱⲛϩ ⲉⲃⲟⲗ ⲛⲁⲛ ϩⲙ̅ ⲡⲓⲟⲩⲟⲉⲓⲛ ⲧⲉⲛⲟⲩ ⲁⲙⲏ‐ <text:line-break/><text:span text:style-name="T1"> </text:span><text:span text:style-name="T2">(116/16) </text:span> ⲉⲓⲧⲛ̅ ⲙⲁⲣⲛ̅ⲉⲙⲁϩⲧⲉ ⲙ̅ⲙⲟⲥ ⲛ̅ⲧⲛ̅ⲛⲟⲩϫⲉ <text:line-break/><text:span text:style-name="T1"> </text:span><text:span text:style-name="T2">(116/17) </text:span> ⲙ̅ⲡⲛ̅ⲥⲡⲉⲣⲙⲁ ⲉⲣⲟⲥ ϫⲉⲕⲁⲁⲥ ⲉⲥϣⲁϫⲱϩⲙ̅ <text:line-break/><text:span text:style-name="T1"> </text:span><text:span text:style-name="T2">(116/18) </text:span> ⲛ̅ⲛⲉⲥϣϭⲙ̅ ϭⲟ’ⲙ ⲛ̅ⲃⲱ’ⲕ ⲉϩⲣⲁⲓ̈ ⲉⲡⲉⲥⲟⲩⲟⲉⲓⲛ <text:line-break/><text:span text:style-name="T1"> </text:span><text:span text:style-name="T2">(116/19) </text:span> ⲁⲗⲗⲁ ⲛⲉ’ⲧⲥⲛⲁϫⲡⲟⲟⲩ ⲥⲉⲛⲁⲣ̅ϩⲩⲡⲟⲧⲁⲥⲥⲉ <text:line-break/><text:span text:style-name="T1"> </text:span><text:span text:style-name="T2">(116/20) </text:span> ⲛⲁⲛ §ⲙ̅ⲡⲣ̅ⲧⲣⲛ̅ϫⲟⲟⲥ ⲇⲉ ⲛ̅ⲁⲇⲁⲙ ϫⲉ ⲟⲩⲉⲃⲟⲗ <text:line-break/><text:span text:style-name="T1"> </text:span><text:span text:style-name="T2">(116/21) </text:span> ⲛ̅ϩⲏⲧⲛ̅ ⲁⲛ ⲡⲉ ⲁⲗⲗⲁ ⲙⲁⲣⲛ̅ⲉⲓⲛⲉ ⲛ̅ⲟⲩⲃ̅ϣⲉ <text:line-break/><text:span text:style-name="T1"> </text:span><text:span text:style-name="T2">(116/22) </text:span> ⲉϩⲣⲁⲓ̈ ⲉϫ’ⲱϥ ⲁⲩⲱ ⲙⲁⲣⲛ̅ⲧⲥⲉⲃ’ⲟϥ ϩⲙ̅ ⲡ’ⲉϥ‐ <text:line-break/><text:span text:style-name="T1"> </text:span><text:span text:style-name="T2">(116/23) </text:span> ϩⲓⲛⲏⲃ ϩⲱⲥ ⲉϣϫⲉ ⲛ̅ⲧⲁⲥϣⲱⲡⲉ ⲉⲃⲟⲗ ϩⲙ̅ <text:line-break/><text:span text:style-name="T1"> </text:span><text:span text:style-name="T2">(116/24) </text:span> ⲡ’ⲉϥⲥⲡⲓⲣ ϫⲉⲕⲁⲁⲥ ⲉⲧⲉⲥϩⲓⲙⲉ ⲛⲁⲣ̅ϩⲩⲡⲟ‐ <text:line-break/><text:span text:style-name="T1"> </text:span><text:span text:style-name="T2">(116/25) </text:span> ⲧⲁⲥⲥ’ⲉ ⲛ̅ϥⲣ̅ ϫⲟⲉⲓⲥ ⲉⲣⲟⲥ §ⲧⲟⲧⲉ ⲉⲩϩⲁ ⲉⲥ‐ <text:line-break/><text:span text:style-name="T1"> </text:span><text:span text:style-name="T2">(116/26) </text:span> ϣⲟⲟ’ⲡ ⲛ̅ⲇⲩⲛⲁⲙⲓⲥ ⲁⲥⲥⲱⲃⲉ ⲛ̅ⲥⲁ ⲧⲟⲩⲅⲛⲱ‐ <text:line-break/><text:soft-page-break/><text:span text:style-name="T1"> </text:span><text:span text:style-name="T2">(116/27) </text:span> ⲙ’ⲏ ⲁⲥϯ ⲑⲗⲁⲥⲧⲛ̅ ⲉⲛⲟⲩⲃⲁⲗ ⲁⲥⲕⲱ ⲙ̅ⲙⲁⲩ <text:line-break/><text:span text:style-name="T1"> </text:span><text:span text:style-name="T2">(116/28) </text:span> ⲙ̅ⲡⲉⲥⲉⲓⲛⲉ ⲛ̅ϫⲓⲟⲩⲉ ⲁⲧⲟⲩⲛ̅ ⲁⲇⲁ’ⲙ §ⲁⲥⲃⲱ’ⲕ <text:line-break/><text:span text:style-name="T1"> </text:span><text:span text:style-name="T2">(116/29) </text:span> ⲉϩⲟⲩⲛ ⲉⲡϣⲏⲛ ⲛ̅ⲧⲅⲛⲱⲥⲓⲥ ⲁⲥϭⲱ ⲙ̅ⲙⲁⲩ <text:line-break/><text:span text:style-name="T1"> </text:span><text:span text:style-name="T2">(116/30) </text:span> ⲛ̅ⲧⲟⲟⲩ ⲇⲉ ⲁⲩⲟⲩⲱϩ ⲛ̅ⲥⲱⲥ ⲁⲥⲟⲩⲱⲛϩ ⲉ‐ <text:line-break/><text:span text:style-name="T1"> </text:span><text:span text:style-name="T2">(116/31) </text:span> ⲃⲟⲗ ⲛⲁⲩ ϫⲉ ⲁⲥⲃⲱ’ⲕ ⲉϩⲟⲩⲛ ⲉⲡϣⲏ’ⲛ ⲁⲥⲣ̅ <text:line-break/><text:span text:style-name="T1"> </text:span><text:span text:style-name="T2">(116/32) </text:span> ϣⲏⲛ ⲛ̅ⲧⲁⲣⲟⲩϣⲱⲡⲉ ⲇⲉ̣ [ϩ]ⲛ̣̅ ⲟⲩⲛⲟϭ ⲛ̅‐ <text:line-break/><text:span text:style-name="T1"> </text:span><text:span text:style-name="T2">(116/33) </text:span> ϩⲣ̅ⲧⲉ ⲁⲩⲡⲱ’ⲧ ⲉⲃⲟⲗ ⲛ̅ϭⲓ † ⲃⲣ̅ⲣⲉ §ⲙ̅ⲙⲛⲛ̅‐ <text:line-break/><text:span text:style-name="T1"> </text:span><text:span text:style-name="T2">(116/34) </text:span> ⲥⲱⲥ ⲛ̅ⲧ[ⲁⲣ]ⲟⲩⲛⲏⲫⲉ ϩⲛ̅ ⲧⲃ̅ϣⲉ ⲁⲩⲉⲓ ⲉϩⲟⲩⲛ <text:line-break/><text:span text:style-name="T1"> </text:span><text:span text:style-name="T2">(116/35) </text:span> ϣ̣[ⲁ] ⲁ̣[ⲇⲁ’ⲙ ⲁ]ⲩ̣ⲱ ⲛ̅ⲧⲁⲣⲟⲩⲛⲁⲩ ⲁⲡⲓⲛⲉ ⲛ̅ⲧ’ⲏ <text:line-break/><text:span text:style-name="T1"> </text:span><text:span text:style-name="T2">(117/1) </text:span> ϩⲁⲧⲟⲟⲧϥ̅ ⲁⲩϣⲧⲟⲣⲧⲣ̅ ⲉⲩⲙⲉⲉⲩⲉ ϫⲉ ⲧⲁⲉⲓ <text:line-break/><text:span text:style-name="T1"> </text:span><text:span text:style-name="T2">(117/2) </text:span> ⲧⲉ ⲉⲩϩⲁ ⲛ̅ⲁⲗⲏⲑⲓⲛⲏ ⲁⲩⲱ ⲁⲩⲣ̅ⲧⲟⲗⲙⲁ ⲁⲩⲉⲓ <text:line-break/><text:span text:style-name="T1"> </text:span><text:span text:style-name="T2">(117/3) </text:span> ⲉϩⲟⲩ’ⲛ ϣⲁⲣⲟⲥ ⲁⲩⲉⲙⲁϩⲧⲉ ⲙ̅ⲙⲟⲥ ⲁⲩⲛⲟⲩ‐ <text:line-break/><text:span text:style-name="T1"> </text:span><text:span text:style-name="T2">(117/4) </text:span> ϫⲉ ⲙ̅ⲡⲟⲩⲥⲡⲉⲣⲙⲁ ⲉϩⲣⲁⲓ̈ ⲉϫⲱⲥ §ⲁⲩⲁⲁⲥ ϩⲛ̅ <text:line-break/><text:span text:style-name="T1"> </text:span><text:span text:style-name="T2">(117/5) </text:span> ⲟⲩⲙⲛ̅ⲧⲡⲁⲛⲟⲩⲣⲅⲟⲥ ⲉⲩϫⲱϩⲙ̅ ⲟⲩ ⲙⲟ‐ <text:line-break/><text:span text:style-name="T1"> </text:span><text:span text:style-name="T2">(117/6) </text:span> ⲛⲟⲛ ⲫⲩⲥ̣ⲓⲕⲱⲥ ⲁⲗⲗⲁ ϩⲛ̅ ⲟⲩⲥⲱ’ⲱϥ ⲉⲩ‐ <text:line-break/><text:span text:style-name="T1"> </text:span><text:span text:style-name="T2">(117/7) </text:span> ϫⲱϩⲙ̅ ⲛ̅ⲧⲥⲫⲣⲁⲅⲓⲥ ⲙ̅ⲡⲉⲥϩⲣⲟⲟⲩ ⲛ̅ϣⲟⲣ’ⲡ <text:line-break/><text:span text:style-name="T1"> </text:span><text:span text:style-name="T2">(117/8) </text:span> ⲛ̅ⲧⲁϩϣⲁϫⲉ ⲛⲙ̅ⲙⲁⲩ ϫⲉ ⲟⲩ ⲡⲉⲧϣⲟⲟ’ⲡ <text:line-break/><text:span text:style-name="T1"> </text:span><text:span text:style-name="T2">(117/9) </text:span> ϩⲓ ⲧⲉⲧⲛ̅ⲉϩⲏ ⲁⲧⲣⲟⲩϫⲱϩ’ⲙ ⲛ̅ⲛⲉⲧϫⲱ ⲙ̅‐ <text:line-break/><text:span text:style-name="T1"> </text:span><text:span text:style-name="T2">(117/10) </text:span> ⲙⲟⲥ ϫⲉ ϩⲓⲧⲙ̅ ⲡϣⲁϫⲉ ⲉⲩϫⲡⲟ ⲙ̅ⲙⲟⲟ̣ⲩ̣ <text:line-break/><text:span text:style-name="T1"> </text:span><text:span text:style-name="T2">(117/11) </text:span> ϩⲛ̅ ⲧⲥⲩ’ⲛⲧⲉⲗⲉⲓⲁ ϩⲓⲧⲛ̅ ⲡⲣⲱⲙⲉ ⲛ̅ⲁⲗⲏⲑⲉⲓ‐ <text:line-break/><text:span text:style-name="T1"> </text:span><text:span text:style-name="T2">(117/12) </text:span> ⲛⲟⲥ §ⲁⲩⲱ ⲁⲩⲣ̅ⲡⲗⲁⲛⲁ ⲉⲛⲥⲉⲥⲟⲟⲩⲛ ⲁⲛ <text:line-break/><text:span text:style-name="T1"> </text:span><text:span text:style-name="T2">(117/13) </text:span> ϫⲉ ⲛ̅ⲧⲁⲩϫⲁϩⲙ̅ ⲡⲟⲩⲥⲱⲙⲁ ⲡⲓⲛⲉ ⲡⲉ ⲛ̅‐ <text:line-break/><text:span text:style-name="T1"> </text:span><text:span text:style-name="T2">(117/14) </text:span> ⲧⲁⲩϫⲁϩⲙϥ̅ ⲛ̅ϭⲓ ⲛⲉⲝⲟⲩⲥⲓⲁ ϩⲛ̅ⲥⲙⲟ’ⲧ ⲛⲓⲙ <text:line-break/><text:span text:style-name="T1"> </text:span><text:span text:style-name="T2">(117/15) </text:span> ⲙⲛ̅ ⲛⲟⲩⲁⲅⲅⲉⲗⲟⲥ §ⲁⲥⲱ ⲛ̅ϣⲟⲣ’ⲡ ⲛ̅ⲁⲃⲉⲗ <text:line-break/><text:span text:style-name="T1"> </text:span><text:span text:style-name="T2">(117/16) </text:span> ⲉⲃⲟⲗ ϩⲙ̅ ⲡϣⲟⲣ’ⲡ ⲛ̅ⲁⲣⲭⲱⲛ ⲁⲩⲱ ⲡⲕⲉⲥⲉⲉ‐ <text:line-break/><text:span text:style-name="T1"> </text:span><text:span text:style-name="T2">(117/17) </text:span> ⲡⲉ ⲛ̅ϣⲏⲣⲉ ⲛ̅ⲧⲁⲥϫⲡⲟⲟⲩ ϩⲓⲧⲛ̅ ⲧⲥⲁϣϥⲉ <text:line-break/><text:span text:style-name="T1"> </text:span><text:span text:style-name="T2">(117/18) </text:span> ⲛ̅ⲉⲝⲟⲩⲥⲓ’ⲁ ⲙⲛ̅ ⲛⲟⲩⲁⲅⲅⲉⲗⲟⲥ §ⲡⲁⲉⲓ ⲇⲉ <text:line-break/><text:span text:style-name="T1"> </text:span><text:span text:style-name="T2">(117/19) </text:span> ⲧⲏ’ⲣϥ ⲁϥϣⲱⲡⲉ ⲕⲁⲧⲁ ⲧⲡⲣⲟⲛⲟⲓⲁ ⲙ̅ⲡⲁⲣ‐ <text:line-break/><text:span text:style-name="T1"> </text:span><text:span text:style-name="T2">(117/20) </text:span> ⲭⲓⲅⲉⲛⲉⲧⲱⲣ ϫⲉⲕⲁⲁⲥ ⲧϣⲟⲣ’ⲡ ⲙ̅ⲙⲁⲁⲩ <text:line-break/><text:span text:style-name="T1"> </text:span><text:span text:style-name="T2">(117/21) </text:span> ⲉⲥⲁϫⲡⲟ ϩⲣⲁⲓ̈ ⲛ̅ϩⲏⲧⲥ̅ ⲛ̅ⲥⲡⲉⲣⲙⲁ ⲛⲓⲙ <text:line-break/><text:span text:style-name="T1"> </text:span><text:span text:style-name="T2">(117/22) </text:span> ⲉϥⲧⲏϩ ⲉϥⲣ̅ϩⲁⲣⲙⲟⲥⲉ ⲉϩⲟⲩ’ⲛ ⲉϫⲓⲙⲁⲣ‐ <text:line-break/><text:span text:style-name="T1"> </text:span><text:span text:style-name="T2">(117/23) </text:span> ⲙⲉⲛⲏ ⲙ̅ⲡⲕⲟⲥⲙⲟⲥ ⲙⲛ̅ ⲛⲉⲥⲥⲭⲏⲙⲁ ⲁⲩ‐ <text:line-break/><text:span text:style-name="T1"> </text:span><text:span text:style-name="T2">(117/24) </text:span> ⲱ ⲧⲇⲓⲕⲁⲓⲟⲥⲩⲛ’ⲏ §ⲁⲩⲟⲓⲕⲟⲛⲟⲙⲓⲁ ϣⲱⲡⲉ <text:line-break/><text:span text:style-name="T1"> </text:span><text:span text:style-name="T2">(117/25) </text:span> ⲉⲧⲃⲉ ⲉⲩϩⲁ ϫⲉⲕⲁⲁⲥ ⲙ̅ⲡⲗⲁⲥⲙⲁ ⲛ̅ⲉⲝⲟⲩⲥⲓⲁ <text:line-break/><text:span text:style-name="T1"> </text:span><text:span text:style-name="T2">(117/26) </text:span> ⲉⲩⲛⲁϣⲱⲡⲉ ⲛ̅ϫⲟⲗϫⲗ̅ ⲙ̅ⲡⲟⲩⲟⲉⲓⲛ ⲧⲟ‐ <text:line-break/><text:span text:style-name="T1"> </text:span><text:span text:style-name="T2">(117/27) </text:span> ⲧⲉ ϥⲛⲁⲣ̅ⲕⲁⲧⲁⲕⲣⲓⲛⲉ ⲙ̅ⲙⲟⲟⲩ ϩⲓⲧⲛ̅ ⲛⲟⲩ‐ <text:line-break/><text:span text:style-name="T1"> </text:span><text:span text:style-name="T2">(117/28) </text:span> ⲡⲗⲁⲥⲙⲁ §ⲡϣⲟⲣⲡ ϭⲉ ⲛ̅ⲁⲇⲁ’ⲙ ⲛ̅ⲧⲉ ⲡⲟⲩ‐ <text:line-break/><text:span text:style-name="T1"> </text:span><text:span text:style-name="T2">(117/29) </text:span> ⲟⲉⲓⲛ ⲟⲩⲡⲛⲉⲩⲙⲁⲧⲓⲕⲟⲥ ⲡⲉ ⲁϥⲟⲩⲱⲛϩ <text:line-break/><text:span text:style-name="T1"> </text:span><text:span text:style-name="T2">(117/30) </text:span> ⲉⲃⲟⲗ ⲙ̅ⲡϣⲟⲣ’ⲡ ⲛ̅ϩⲟⲟⲩ ⲡⲙⲁϩⲥⲛⲁⲩ <text:line-break/><text:span text:style-name="T1"> </text:span><text:span text:style-name="T2">(117/31) </text:span> ⲛ̅ⲁⲇⲁ’ⲙ ⲟⲩⲯⲩⲭⲓⲕⲟⲥ ⲡⲉ ⲁϥⲟⲩⲱⲛϩ ⲉⲃⲟⲗ <text:line-break/><text:span text:style-name="T1"> </text:span><text:span text:style-name="T2">(117/32) </text:span> ⲙ̅ⲡⲙⲁϩ[ⲥⲟ]ⲟⲩ ⲛ̅ϩⲟⲟⲩ ⲡⲁⲉⲓ ⲉⲧⲟⲩⲙⲟⲩ‐ <text:line-break/><text:span text:style-name="T1"> </text:span><text:span text:style-name="T2">(117/33) </text:span> ⲧⲉ ⲉⲣⲟϥ ϫ[ⲉ ⲁ]ⲫⲣⲟⲇⲉⲓⲧⲏ ⲡⲙⲁϩϣⲟⲙⲧ <text:line-break/><text:span text:style-name="T1"> </text:span><text:span text:style-name="T2">(117/34) </text:span> ⲛ̅ⲁⲇⲁⲙ ⲟⲩⲭⲟⲓ̈ⲕⲟⲥ ⲡⲉ ⲉⲧⲉ ⲡⲁⲉⲓ ⲡⲉ <text:line-break/><text:span text:style-name="T1"> </text:span><text:span text:style-name="T2">(117/35) </text:span> ⲡⲣⲙ̅ⲛ̅ⲛⲟⲙⲟⲥ ⲛ̅ⲧⲁϩⲟⲩ[ⲱⲛϩ] ⲉⲃⲟ̣[ⲗ] ϩⲙ̅ <text:line-break/><text:span text:style-name="T1"> </text:span><text:span text:style-name="T2">(117/36) </text:span> ⲡⲙⲁϩϣⲙⲟⲩⲛ ⲛ̅ϩⲟⲟⲩ [ ʹ26 ⲧⲁⲛⲁ] <text:line-break/><text:span text:style-name="T1"> </text:span><text:span text:style-name="T2">(118/1) </text:span> ⲡⲁⲩⲥⲓⲥ ⲛ̅ⲧⲙⲛ̅ⲧϩⲏⲕⲉ ⲧⲁⲉⲓ ⲉⲧⲟⲩⲙⲟⲩⲧⲉ <text:line-break/><text:span text:style-name="T1"> </text:span><text:span text:style-name="T2">(118/2) </text:span> ⲉⲣⲟⲥ ϫⲉ ϩⲏⲙⲉⲣⲁ ⲏⲗⲓⲟⲩ §ⲡϫⲡⲟ ⲇⲉ ⲙ̅’ⲡ‐ <text:line-break/><text:soft-page-break/><text:span text:style-name="T1"> </text:span><text:span text:style-name="T2">(118/3) </text:span> ⲭⲟⲓ̈ⲕⲟⲥ ⲛ̅ⲁⲇⲁⲙ ⲁϥⲁϣⲉⲉⲓ ⲁϥϫⲱ’ⲕ ⲉⲃⲟ’ⲗ <text:line-break/><text:span text:style-name="T1"> </text:span><text:span text:style-name="T2">(118/4) </text:span> ⲁϥϫⲡⲟ ϩⲣⲁⲓ̈ ⲛ̅ϩⲏ’ⲧϥ ⲛ̅ϣⲓⲥⲧⲟⲣⲓⲁ ⲛⲓ’ⲙ ⲙ̅‐ <text:line-break/><text:span text:style-name="T1"> </text:span><text:span text:style-name="T2">(118/5) </text:span> ⲯⲩⲭⲓⲕⲟⲥ ⲛ̅ⲁⲇⲁ’ⲙ ⲡⲧⲏ’ⲣϥ ⲇⲉ ⲛ’ⲉϥϩⲛ̅ ⲟⲩ‐ <text:line-break/><text:span text:style-name="T1"> </text:span><text:span text:style-name="T2">(118/6) </text:span> ⲙⲛ̅ⲧⲁⲧⲥⲟⲟⲩ’ⲛ §ⲙⲙⲛ̅ⲛ̅ⲥⲱⲥ ϯⲛⲁϫⲟⲟⲥ <text:line-break/><text:span text:style-name="T1"> </text:span><text:span text:style-name="T2">(118/7) </text:span> ⲛ̅ⲧⲁⲣⲟⲩⲛⲁⲩ ⲇⲉ ⲉⲣ’ⲟϥ ⲛ̅ϭⲓ ⲛⲁⲣⲭⲱⲛ ⲙⲛ̅ <text:line-break/><text:span text:style-name="T1"> </text:span><text:span text:style-name="T2">(118/8) </text:span> ⲧⲉⲧⲛ̅ⲛⲙ̅ⲙ’ⲁϥ ⲉⲩⲣ̅ⲡⲗⲁⲛⲁ ϩⲛ̅ ⲟⲩⲙⲛ̅ⲧⲁ’ⲧ‐ <text:line-break/><text:span text:style-name="T1"> </text:span><text:span text:style-name="T2">(118/9) </text:span> ⲥⲟⲟⲩ’ⲛ ⲛ̅ⲑⲉ ⲛ̅ⲛⲓⲧⲃ̅ⲛⲏ ⲁⲩⲣⲁϣⲉ ⲙ̅ⲡϣ’ⲁ <text:line-break/><text:span text:style-name="T1"> </text:span><text:span text:style-name="T2">(118/10) </text:span> §〈 ʹ26 〉 ⲛ̣̅ⲧⲁⲣⲟⲩⲉⲓⲙⲉ ϫⲉ ⲡⲣⲱⲙⲉ ⲛ̅ⲁⲧⲙⲟⲩ ϥⲛⲁⲣ̅‐ <text:line-break/><text:span text:style-name="T1"> </text:span><text:span text:style-name="T2">(118/11) </text:span> ⲡⲁⲣⲁⲃⲁ ⲁ’ⲛ ⲉⲣⲟⲟⲩ ⲁⲗⲗⲁ ⲉⲩⲛⲁⲣ̅ⲡⲕⲉⲣ̅ ϩⲟ‐ <text:line-break/><text:span text:style-name="T1"> </text:span><text:span text:style-name="T2">(118/12) </text:span> ⲧⲉ ϩⲏⲧⲥ̅ ⲛ̅ⲧⲉⲛⲧⲁϩⲣ̅ ϣⲏⲛ ⲁⲩϣⲧⲟⲣⲧⲣ̅ ⲡⲉ‐ <text:line-break/><text:span text:style-name="T1"> </text:span><text:span text:style-name="T2">(118/13) </text:span> ϫⲁⲩ ϫⲉ ⲙⲏⲡⲱⲥ ⲡⲁⲉⲓ ⲡⲉ ⲡⲣⲱⲙⲉ ⲛ̅ⲁⲗ’ⲏ‐ <text:line-break/><text:span text:style-name="T1"> </text:span><text:span text:style-name="T2">(118/14) </text:span> ⲑⲉⲓⲛⲟⲥ ⲡⲁⲉⲓ ⲉⲛⲧⲁϩϯ ⲗⲟⲥⲧⲛ̅ ⲛⲁⲛ ⲁⲩⲱ <text:line-break/><text:span text:style-name="T1"> </text:span><text:span text:style-name="T2">(118/15) </text:span> ⲁϥⲧⲥⲉⲃⲟⲛ ⲉⲧⲁⲉⲓ ⲉⲛⲧⲁⲩϫⲁϩⲙⲉⲥ ⲉⲥⲓⲛⲉ <text:line-break/><text:span text:style-name="T1"> </text:span><text:span text:style-name="T2">(118/16) </text:span> ⲙ̅ⲙ’ⲟϥ ϣⲓⲛⲁ ⲉⲩⲛⲁϫⲣⲟ ⲉⲣⲟⲛ §ⲧⲟⲧⲉ ⲁⲩϫⲓ <text:line-break/><text:span text:style-name="T1"> </text:span><text:span text:style-name="T2">(118/17) </text:span> ⲥⲩⲙⲃⲟⲩⲗⲓⲟⲛ ⲙ̅ⲡⲥⲁ’ϣϥ ⲁⲩⲉⲓ ⲉϩⲟⲩ’ⲛ ϣⲁ ⲁ‐ <text:line-break/><text:span text:style-name="T1"> </text:span><text:span text:style-name="T2">(118/18) </text:span> ⲇⲁ’ⲙ ⲙⲛ̅ ⲉⲩϩⲁ ϩⲛ̅ⲛⲟⲩⲫⲟⲃⲟⲥ ⲡⲉϫⲁⲩ ⲛ’ⲁϥ <text:line-break/><text:span text:style-name="T1"> </text:span><text:span text:style-name="T2">(118/19) </text:span> ϫⲉ ϣⲏⲛ ⲛⲓ’ⲙ ⲉⲧϩⲛ̅ ⲡⲁⲣⲁⲇⲉⲓⲥⲟⲥ ⲛ̅ⲧⲁⲩⲥⲟⲛ‐ <text:line-break/><text:span text:style-name="T1"> </text:span><text:span text:style-name="T2">(118/20) </text:span> ⲧⲟⲩ ⲛⲏⲧⲛ̅ ⲉⲩ〈ⲛⲁ〉ⲟⲩⲱⲙ ⲡⲟⲩⲕⲁⲣⲡⲟⲥ ⲡϣⲏⲛ <text:line-break/><text:span text:style-name="T1"> </text:span><text:span text:style-name="T2">(118/21) </text:span> ⲇⲉ ⲛ̅ⲧⲅⲛⲱⲥⲓⲥ ⲉⲣⲏϩ ⲉⲣⲱⲧⲛ̅ ⲙ̅ⲡⲣ̅ⲟⲩⲱ’ⲙ <text:line-break/><text:span text:style-name="T1"> </text:span><text:span text:style-name="T2">(118/22) </text:span> ⲉⲃⲟⲗ ⲛ̅ϩⲏ’ⲧϥ ⲉϣⲱⲡⲉ ⲧⲉⲧⲛⲁⲟⲩⲱ’ⲙ ⲧⲉ <text:line-break/><text:span text:style-name="T1"> </text:span><text:span text:style-name="T2">(118/23) </text:span> ⲧⲛⲁⲙⲟⲩ ⲛ̅ⲧⲁⲣⲟⲩϯ ⲛⲁⲩ ⲟⲩⲛⲟϭ ⲙ̅ⲫⲟⲃⲟⲥ <text:line-break/><text:span text:style-name="T1"> </text:span><text:span text:style-name="T2">(118/24) </text:span> ⲁⲩⲣ̅ⲁⲛⲁⲭⲱⲣⲉⲓ ⲉϩⲣⲁⲓ̈ ⲉⲛⲟⲩⲉⲝⲟⲩⲥⲓⲁ §ⲧⲟ <text:line-break/><text:span text:style-name="T1"> </text:span><text:span text:style-name="T2">(118/25) </text:span> ⲧⲉ ⲁϥⲉⲓ ⲛ̅ϭⲓ ⲡⲥⲁⲃⲉ ⲡⲁⲣⲁⲣⲟⲟⲩ ⲧⲏⲣⲟⲩ <text:line-break/><text:span text:style-name="T1"> </text:span><text:span text:style-name="T2">(118/26) </text:span> ⲡⲁⲉⲓ ⲛ̅ⲧⲁⲩⲙⲟⲩⲧⲉ ⲉⲣ’ⲟϥ ϫⲉ ⲡⲑⲏⲣⲓⲟⲛ <text:line-break/><text:span text:style-name="T1"> </text:span><text:span text:style-name="T2">(118/27) </text:span> ⲁⲩⲱ ⲛ̅ⲧⲁⲣⲉϥⲛⲁⲩ ⲉⲡⲓⲛⲉ ⲛ̅ⲧⲟⲩⲙⲁⲁⲩ <text:line-break/><text:span text:style-name="T1"> </text:span><text:span text:style-name="T2">(118/28) </text:span> ⲉⲩϩ’ⲁ ⲡⲉϫⲁϥ ⲛⲁⲥ ϫⲉ ⲟⲩ ⲡⲉⲛⲧⲁ ⲡⲛⲟⲩⲧⲉ <text:line-break/><text:span text:style-name="T1"> </text:span><text:span text:style-name="T2">(118/29) </text:span> ϫⲟ’ⲟϥ ⲛⲏⲧⲛ̅ ϫⲉ ⲙ̅ⲡⲣ̅ⲟⲩⲱⲙ ⲉⲃⲟⲗ ϩⲙ̅ ⲡϣⲏⲛ <text:line-break/><text:span text:style-name="T1"> </text:span><text:span text:style-name="T2">(118/30) </text:span> ⲛ̅ⲧⲅⲛⲱⲥⲓⲥ ⲡⲉϫⲁⲥ ϫⲉ ⲁϥϫⲟⲟⲥ ϫⲉ ⲟⲩ ⲙⲟ‐ <text:line-break/><text:span text:style-name="T1"> </text:span><text:span text:style-name="T2">(118/31) </text:span> ⲛⲟⲛ ϫⲉ ⲙ̅ⲡⲣ̅ⲟⲩⲱⲙ ⲉⲃⲟ[ⲗ ⲛ̅]ϩ̣ⲏ’ⲧϥ ⲁⲗⲗⲁ <text:line-break/><text:span text:style-name="T1"> </text:span><text:span text:style-name="T2">(118/32) </text:span> ⲙ̅ⲡⲣ̅ϫⲱϩ ⲉⲣ’ⲟϥ ϣⲓⲛⲁ ϫ[ⲉ ⲛⲉ]ⲙ̣ⲟⲩ ⲡⲉϫⲁϥ <text:line-break/><text:span text:style-name="T1"> </text:span><text:span text:style-name="T2">(118/33) </text:span> ⲛⲁⲥ̣ ϫⲉ ⲙ̣ⲡ̣ⲣ̅ⲣ̅ ϩⲟⲧⲉ ϩⲛ̅ⲛⲟⲩⲙⲟⲩ ⲉⲧⲉⲧⲛⲁ‐ <text:line-break/><text:span text:style-name="T1"> </text:span><text:span text:style-name="T2">(118/34) </text:span> ⲙ̣[ⲟⲩ ⲁ’ⲛ ϥⲥⲟⲟ]ⲩ̣ⲛ ⲅⲁⲣ ϫⲉ ⲉⲧⲉⲧⲛ̅ⲟⲩⲱ’ⲙ <text:line-break/><text:span text:style-name="T1"> </text:span><text:span text:style-name="T2">(119/1) </text:span> ⲉⲃⲟⲗ ⲛ̅ϩⲏ’ⲧϥ ⲡⲉⲧⲛ̅ⲛⲟⲩⲥ ⲛⲁⲣ̅ⲛⲏⲫⲉ ⲁⲩⲱ <text:line-break/><text:span text:style-name="T1"> </text:span><text:span text:style-name="T2">(119/2) </text:span> ⲧⲉⲧⲛ̅ⲛⲁϣⲱⲡⲉ ⲛ̅ⲑⲉ ⲛ̅ⲛⲓⲛⲟⲩⲧⲉ ⲉⲧⲉⲧⲛ̅‐ <text:line-break/><text:span text:style-name="T1"> </text:span><text:span text:style-name="T2">(119/3) </text:span> ⲥⲟⲟⲩⲛ ⲛ̅ⲧⲇⲓⲁⲫⲟⲣ’ⲁ ⲉⲧϣⲟⲟ’ⲡ ⲟⲩⲧⲉ ⲙ̅‐ <text:line-break/><text:span text:style-name="T1"> </text:span><text:span text:style-name="T2">(119/4) </text:span> ⲡⲟⲛⲏⲣⲟⲥ ⲣ̅ⲣⲱⲙⲉ ⲙⲛ̅ ⲛ̅ⲁⲅⲁⲑⲟⲥ ⲛ̅ⲧⲁϥ‐ <text:line-break/><text:span text:style-name="T1"> </text:span><text:span text:style-name="T2">(119/5) </text:span> ϫⲉ ⲡⲁⲉⲓ ⲅⲁⲣ ⲛⲏⲧⲛ̅ ⲉϥⲣ̅ⲫⲑⲟⲛⲉⲓ ϫⲉ ⲛⲉⲧⲛ̅‐ <text:line-break/><text:span text:style-name="T1"> </text:span><text:span text:style-name="T2">(119/6) </text:span> ⲟⲩⲱⲙ ⲉⲃⲟⲗ ⲛ̅ϩⲏ’ⲧϥ §ⲉⲩϩⲁ ⲇⲉ ⲁⲥⲑⲁⲣⲣⲉⲓ <text:line-break/><text:span text:style-name="T1"> </text:span><text:span text:style-name="T2">(119/7) </text:span> ⲁⲛϣⲁϫⲉ ⲙ̅ⲡⲣⲉϥⲧⲁⲙⲟ ⲁⲥϭⲱϣ’ⲧ ⲉϩⲟⲩⲛ <text:line-break/><text:span text:style-name="T1"> </text:span><text:span text:style-name="T2">(119/8) </text:span> ϩⲙ̅ ⲡϣⲏⲛ ⲁⲥⲛⲁⲩ ⲉⲣⲟϥ ϫⲉ ⲛⲉⲥⲱϥ ⲁⲩⲱ <text:line-break/><text:span text:style-name="T1"> </text:span><text:span text:style-name="T2">(119/9) </text:span> ⲟⲩⲗⲉϩⲗϩ ⲡⲉ ⲁⲥⲙⲉⲣⲓ’ⲧϥ ⲁⲥϫⲓ ⲉⲃⲟⲗ ϩⲙ̅ <text:line-break/><text:span text:style-name="T1"> </text:span><text:span text:style-name="T2">(119/10) </text:span> ⲡⲉϥⲕⲁⲣⲡⲟⲥ ⲁⲥⲟⲩⲱ’ⲙ ⲁⲥϯ ⲙ̅ⲡⲉⲥⲕ[ⲉ]‐ <text:line-break/><text:span text:style-name="T1"> </text:span><text:span text:style-name="T2">(119/11) </text:span> ϩⲁⲓ̈ ’ⲁϥⲟⲩⲱ’ⲙ ϩⲱ’ⲱϥ ⲧⲟⲧⲉ ⲁⲡⲟⲩⲛⲟⲩⲥ <text:line-break/><text:span text:style-name="T1"> </text:span><text:span text:style-name="T2">(119/12) </text:span> ⲟⲩⲱⲛ ⲛ̅ⲧⲁⲣⲟⲩⲟⲩⲱ’ⲙ ⲅⲁⲣ ⲁⲡⲟⲩⲟⲉⲓⲛ <text:line-break/><text:span text:style-name="T1"> </text:span><text:span text:style-name="T2">(119/13) </text:span> ⲛ̅ⲧⲅⲛⲱⲥⲓⲥ ⲣ̅ ⲟⲩⲟⲉⲓⲛ ⲛⲁⲩ ⲛ̅ⲧⲁⲣⲟⲩϯ ϩⲓⲱ‐ <text:line-break/><text:span text:style-name="T1"> </text:span><text:span text:style-name="T2">(119/14) </text:span> ⲟⲩ ⲙ̅ⲡϣⲓⲡⲉ ⲁⲩⲉⲓⲙⲉ ϫⲉ ⲛⲉⲩⲕⲁⲕⲁϩⲏⲩ <text:line-break/><text:span text:style-name="T1"> </text:span><text:span text:style-name="T2">(119/15) </text:span> ⲁⲧⲅⲛⲱⲥⲓⲥ ⲛ̅ⲧⲁⲣⲟⲩⲣ̅ⲛⲏⲫⲉ ⲁⲩⲛⲁⲩ ⲉⲣⲟⲟⲩ <text:line-break/><text:soft-page-break/><text:span text:style-name="T1"> </text:span><text:span text:style-name="T2">(119/16) </text:span> ϫⲉ ⲥⲉⲕⲁⲕⲁϩⲏⲩ ⲁⲩⲙⲣ̅ⲣⲉ ⲛⲟⲩⲉⲣⲏⲩ ⲛ̅ⲧⲁ‐ <text:line-break/><text:span text:style-name="T1"> </text:span><text:span text:style-name="T2">(119/17) </text:span> ⲣⲟⲩⲛⲁⲩ ⲁⲛⲟⲩⲡⲗⲁⲥⲧⲏⲥ ⲉⲩⲟ ⲙ̅ⲙⲟⲣⲫⲏ <text:line-break/><text:span text:style-name="T1"> </text:span><text:span text:style-name="T2">(119/18) </text:span> ⲛ̅ⲑⲏⲣⲓⲟⲛ ⲁⲩⲥⲓⲭⲁⲛⲉ ⲉⲣⲟⲟⲩ ⲁⲩⲉⲓⲙⲉ ⲉⲙⲁ‐ <text:line-break/><text:span text:style-name="T1"> </text:span><text:span text:style-name="T2">(119/19) </text:span> ⲧⲉ §ⲧⲟⲧⲉ ⲛ̅ⲁⲣⲭⲱⲛ ⲛ̅ⲧⲁⲣⲟⲩⲉⲓⲙⲉ ϫⲉ ⲁⲩⲡⲁ‐ <text:line-break/><text:span text:style-name="T1"> </text:span><text:span text:style-name="T2">(119/20) </text:span> ⲣⲁⲃⲁ ⲛ̅ⲧⲟⲩⲉⲛⲧⲟⲗⲏ ⲁⲩⲉⲓ ϩⲛ̅ ⲟⲩⲕⲙ̅ⲧⲟ <text:line-break/><text:span text:style-name="T1"> </text:span><text:span text:style-name="T2">(119/21) </text:span> ⲙⲛ̅ⲛⲟⲩⲛⲟϭ ⲛ̅ⲁⲡⲉⲓⲗⲏ ⲉϩⲟⲩ’ⲛ ⲉⲡⲡⲁ‐ <text:line-break/><text:span text:style-name="T1"> </text:span><text:span text:style-name="T2">(119/22) </text:span> ⲣⲁⲇⲉⲓⲥⲟⲥ ϣⲁ ⲁⲇⲁ’ⲙ ⲙⲛ̅ⲛⲉⲩϩⲁ ⲉⲧⲣⲟⲩⲛⲁⲩ <text:line-break/><text:span text:style-name="T1"> </text:span><text:span text:style-name="T2">(119/23) </text:span> ⲉⲡⲁⲡⲟⲧⲉⲗⲉⲥⲙⲁ ⲛ̅ⲧⲃⲟⲏⲑⲉⲓⲁ ⲧⲟⲧⲉ <text:line-break/><text:span text:style-name="T1"> </text:span><text:span text:style-name="T2">(119/24) </text:span> ⲁⲁⲇⲁⲙ ⲙⲛ̅ⲛⲉⲩϩⲁ ⲁⲩϣⲧⲟⲣⲧⲣ̅ ⲉⲙⲁⲧⲉ <text:line-break/><text:span text:style-name="T1"> </text:span><text:span text:style-name="T2">(119/25) </text:span> ⲁⲩⲕⲱ’ⲡ ϩⲁ ⲛϣⲏⲛ ⲉⲧϩⲙ̅ ⲡⲁⲣⲁⲇⲉⲓⲥⲟⲥ <text:line-break/><text:span text:style-name="T1"> </text:span><text:span text:style-name="T2">(119/26) </text:span> ⲧⲟⲧⲉ ⲛ̅ⲁⲣⲭⲱⲛ ⲙ̅ⲡⲟⲩⲉⲓⲙⲉ ϫⲉ ⲉⲩⲧⲱⲛ <text:line-break/><text:span text:style-name="T1"> </text:span><text:span text:style-name="T2">(119/27) </text:span> ⲡⲉϫⲁⲩ ϫⲉ ⲁⲇⲁ’ⲙ ⲉⲕⲧⲱ’ⲛ ⲡⲉϫⲁϥ ϫⲉ ϯⲛ̅‐ <text:line-break/><text:span text:style-name="T1"> </text:span><text:span text:style-name="T2">(119/28) </text:span> ⲛⲉⲉⲓⲙⲁ ⲉⲧⲃⲉ ⲧⲉⲧⲛ̅ϩⲣ̅ⲧⲉ ⲇⲉ ⲁϩⲓⲕⲱ’ⲡ <text:line-break/><text:span text:style-name="T1"> </text:span><text:span text:style-name="T2">(119/29) </text:span> ⲛ̅ⲧⲁⲣⲓϣⲓⲡ’ⲉ ⲡⲉϫⲁⲩ ⲇⲉ ⲛ’ⲁϥ ϩⲛ̅ ⲟⲩⲙⲛ̅ⲧ‐ <text:line-break/><text:span text:style-name="T1"> </text:span><text:span text:style-name="T2">(119/30) </text:span> ⲁⲧⲥⲟⲟⲩⲛ ϫⲉ ⲛⲓⲙ ⲡⲉⲛⲧⲁϩϫⲱ ⲛⲁ’ⲕ ⲙ̅‐ <text:line-break/><text:span text:style-name="T1"> </text:span><text:span text:style-name="T2">(119/31) </text:span> ⲡϣⲓⲡⲉ ⲛ̣̅ⲧ̣ⲁ̣’ⲕⲧⲁⲁϥ ϩⲓⲱⲱ’ⲕ ⲉⲓ ⲙⲏⲧⲓ ϫⲉ <text:line-break/><text:span text:style-name="T1"> </text:span><text:span text:style-name="T2">(119/32) </text:span> ⲁ’ⲕⲟⲩⲱ̣[ⲙ ⲉⲃⲟ]ⲗ ϩⲙ̅ ⲡⲓϣⲏ’ⲛ ⲡⲉϫⲁϥ <text:line-break/><text:span text:style-name="T1"> </text:span><text:span text:style-name="T2">(119/33) </text:span> ϫⲉ ⲧⲥϩⲓⲙ[ⲉ] ⲛ̣̅ⲧ̣ⲁ’ⲕⲧⲁⲁⲥ ⲛⲁⲉⲓ ⲛ̣̅ⲧⲟⲥ ⲡⲉ̣ⲛ‐ <text:line-break/><text:span text:style-name="T1"> </text:span><text:span text:style-name="T2">(119/34) </text:span> ⲧⲁⲥϯ ⲛⲁⲉⲓ ⲁⲉⲓⲟⲩⲱ’ⲙ ⲧⲟⲧ[ⲉ ⲡⲉϫⲁ]ⲩ̣ ⲛ̣̅[ⲧ]ⲏ̣ <text:line-break/><text:span text:style-name="T1"> </text:span><text:span text:style-name="T2">(120/1) </text:span> ϫⲉ ⲟⲩ ⲡⲉ ⲡⲁⲉⲓ ⲛ̅ⲧⲁⲁ’ⲁϥ ⲁⲥⲟⲩⲱϣ’ⲃ ⲡⲉ‐ <text:line-break/><text:span text:style-name="T1"> </text:span><text:span text:style-name="T2">(120/2) </text:span> ϫⲁⲥ ϫⲉ ⲡⲣ’ⲉϥⲧⲁⲙⲟ ⲡⲉⲛⲧⲁϩⲧⲟⲃⲥ’ⲧ ⲁϩⲓ‐ <text:line-break/><text:span text:style-name="T1"> </text:span><text:span text:style-name="T2">(120/3) </text:span> ⲟⲩⲱ’ⲙ §ⲧⲟⲧⲉ ⲁⲛⲁⲣⲭⲱⲛ ⲉⲓ ϣⲁ ⲡⲣⲉϥⲧⲁ‐ <text:line-break/><text:span text:style-name="T1"> </text:span><text:span text:style-name="T2">(120/4) </text:span> ⲙⲟ ⲁⲛⲟⲩⲃⲁ’ⲗ ⲣ̅ ϩⲗⲟⲥⲧⲛ̅ ⲉⲃⲟⲗ ϩⲓⲧⲟⲟ’ⲧϥ <text:line-break/><text:span text:style-name="T1"> </text:span><text:span text:style-name="T2">(120/5) </text:span> ⲙ̅ⲡⲟⲩϣϭⲙ̅ ϭⲟⲙ ⲛ̅ⲣ̅ ⲗⲁⲁⲩ ⲛ’ⲁϥ ⲁⲩⲥⲟⲩϩⲱ’ⲣϥ <text:line-break/><text:span text:style-name="T1"> </text:span><text:span text:style-name="T2">(120/6) </text:span> ϩⲱⲥ ⲉⲩⲟ ⲛ̅ⲁⲧϭⲟⲙ §ⲙ̅ⲙⲛ̅ⲛ̅ⲥⲱⲥ ⲁⲩⲉⲓ ϣⲁ ⲧⲥϩⲓ‐ <text:line-break/><text:span text:style-name="T1"> </text:span><text:span text:style-name="T2">(120/7) </text:span> ⲙⲉ ⲁⲩⲥⲟⲩϩⲱⲣⲥ̅ ⲙⲛ̅ ⲛⲉⲥϣⲏⲣⲉ ⲙ̅ⲙⲛ̅ⲛ̅ⲥⲁ <text:line-break/><text:span text:style-name="T1"> </text:span><text:span text:style-name="T2">(120/8) </text:span> ⲧⲥϩⲓⲙ’ⲉ ⲁⲩⲥϩⲟⲩⲱ’ⲣ ⲁⲇⲁ’ⲙ ⲙⲛ̅ ⲡⲕⲁϩ ⲉⲧⲃⲏ’ⲧϥ <text:line-break/><text:span text:style-name="T1"> </text:span><text:span text:style-name="T2">(120/9) </text:span> ⲙⲛ̅ ⲛ̅ⲕⲁⲣⲡⲟⲥ ⲁⲩⲱ ϩⲱⲃ ⲛⲓⲙ ⲛ̅ⲧⲁⲩⲧⲁⲙⲓⲟ‐ <text:line-break/><text:span text:style-name="T1"> </text:span><text:span text:style-name="T2">(120/10) </text:span> ⲟⲩ ⲁⲩⲥϩⲟⲩⲱⲣⲟⲩ §ⲙⲛ̅ ⲗⲁⲁⲩ ⲛ̅ⲥⲙⲟⲩ ⲛ̅ⲧⲟⲟ‐ <text:line-break/><text:span text:style-name="T1"> </text:span><text:span text:style-name="T2">(120/11) </text:span> ⲧⲟⲩ ⲙⲛ̅ ϭⲟⲙ ⲛ̅ⲥⲉϫⲡⲉ ⲁⲅⲁⲑⲟⲛ ⲉⲃⲟⲗ ϩⲙ̅ <text:line-break/><text:span text:style-name="T1"> </text:span><text:span text:style-name="T2">(120/12) </text:span> ⲡⲡⲟⲛⲏⲣⲟⲛ §ϫⲓⲙ ⲫⲟⲟⲩ ⲉⲧⲙ̅ⲙⲁⲩ ⲁⲛⲉⲝⲟⲩ‐ <text:line-break/><text:span text:style-name="T1"> </text:span><text:span text:style-name="T2">(120/13) </text:span> ⲥⲓⲁ ⲉⲓⲙⲉ ϫⲉ ⲁⲗⲏⲑⲱⲥ ⲟⲩⲙ̅ ⲡⲉⲧϫⲟⲟ’ⲣ ϩⲓ <text:line-break/><text:span text:style-name="T1"> </text:span><text:span text:style-name="T2">(120/14) </text:span> ⲧⲟⲩⲉϩⲏ ⲛⲉⲩⲥⲟⲟⲩ’ⲛ ⲁⲛ ⲡⲉ ⲉⲓ ⲙⲏⲧⲓ ϫⲉ <text:line-break/><text:span text:style-name="T1"> </text:span><text:span text:style-name="T2">(120/15) </text:span> ⲙ̅ⲡⲟⲩⲣ̅ⲧⲏⲣⲉⲓ ⲛ̅ⲧⲟⲩⲉⲛⲧⲟⲗⲏ ⲁⲩⲛ̅ ⲟⲩⲛⲟϭ <text:line-break/><text:span text:style-name="T1"> </text:span><text:span text:style-name="T2">(120/16) </text:span> ⲛ̅ⲕⲱϩ ⲉϩⲟⲩⲛ ⲉⲡⲕⲟⲥⲙⲟⲥ ⲙⲟⲛⲟ’ⲛ ⲉⲧⲃⲉ <text:line-break/><text:span text:style-name="T1"> </text:span><text:span text:style-name="T2">(120/17) </text:span> ⲡⲣⲱⲙⲉ ⲛ̅ⲁⲧⲙⲟⲩ §ⲛ̅ⲧⲁⲣⲉ ⲛⲁⲣⲭⲱⲛ ⲇⲉ ⲛⲁⲩ <text:line-break/><text:span text:style-name="T1"> </text:span><text:span text:style-name="T2">(120/18) </text:span> ⲉⲡⲟⲩⲁⲇⲁ’ⲙ 〈ⲉ〉ⲁϥϣⲱⲡⲉ ϩⲛ̅ ⲕⲉⲅⲛⲱⲥⲓⲥ ⲁⲩ‐ <text:line-break/><text:span text:style-name="T1"> </text:span><text:span text:style-name="T2">(120/19) </text:span> ⲟⲩⲱϣ ⲁⲣ̅ⲡⲉⲓⲣⲁⲥⲉ ⲙ̅ⲙ’ⲟϥ ⲁⲩⲥⲱⲟⲩ’ϩ ⲉ‐ <text:line-break/><text:span text:style-name="T1"> </text:span><text:span text:style-name="T2">(120/20) </text:span> ϩⲟⲩ’ⲛ ⲛ̅ⲛ̅ⲧⲃⲛⲟⲟⲩⲉ ⲧⲏⲣⲟⲩ ⲙⲛ̅ ⲛ̅ⲑⲏⲣⲓⲟⲛ <text:line-break/><text:span text:style-name="T1"> </text:span><text:span text:style-name="T2">(120/21) </text:span> ⲙ̅ⲡⲕⲁϩ ⲙⲛ̅ ⲛ̅ϩⲁⲗⲁⲧⲉ ⲛ̅ⲧⲡⲉ ⲁⲩⲛ̅ⲧⲟⲩ ϣⲁ ’ⲁ‐ <text:line-break/><text:span text:style-name="T1"> </text:span><text:span text:style-name="T2">(120/22) </text:span> ⲇⲁⲙ ϫⲉ ⲉⲩⲉⲛⲁⲩ ϫⲉ ϥⲛⲁⲙⲟⲩⲧⲉ ⲉⲣⲟⲟⲩ ϫⲉ <text:line-break/><text:span text:style-name="T1"> </text:span><text:span text:style-name="T2">(120/23) </text:span> ⲛⲓ’ⲙ ⲛ̅ⲧⲁⲣ’ⲉϥⲛⲁⲩ ⲉⲣⲟⲟⲩ ⲁϥϯ ⲣⲁ’ⲛ ⲉⲛⲟⲩ‐ <text:line-break/><text:span text:style-name="T1"> </text:span><text:span text:style-name="T2">(120/24) </text:span> ⲕⲧⲓⲥⲙ’ⲁ §ⲁⲩϣⲧⲟⲣⲧⲣ̅ ϫⲉ ⲁϥⲣ̅ⲛⲏⲫⲉ ⲉⲃⲟⲗ <text:line-break/><text:span text:style-name="T1"> </text:span><text:span text:style-name="T2">(120/25) </text:span> ϩⲛ̅ ⲁⲅⲱⲛⲓⲁ ⲛⲓ’ⲙ ⲛ̅ϭⲓ ⲁⲇⲁ’ⲙ ⲁⲩⲥⲱⲟⲩϩ ⲁⲩ‐ <text:line-break/><text:span text:style-name="T1"> </text:span><text:span text:style-name="T2">(120/26) </text:span> ϫⲓ ⲥⲩⲙⲃⲟⲩⲗⲓⲟⲛ ⲡⲉϫⲁⲩ ϫⲉ ⲉⲓⲥ ⲁⲇⲁ’ⲙ <text:line-break/><text:span text:style-name="T1"> </text:span><text:span text:style-name="T2">(120/27) </text:span> ⲁϥϣⲱⲡⲉ ⲛ̅ⲑⲉ ⲟⲩⲁ ⲉⲃⲟ’ⲗ ⲙ̅ⲙⲟⲛ ⲁⲧⲣ’ⲉϥ‐ <text:line-break/><text:span text:style-name="T1"> </text:span><text:span text:style-name="T2">(120/28) </text:span> ⲉⲓⲙⲉ ⲛ̅ⲧⲇⲓⲁⲫⲟⲣⲁ ⲙ̅ⲡⲟⲩⲟⲉⲓⲛ ⲙⲛ̅ ⲡⲕⲁ‐ <text:line-break/><text:soft-page-break/><text:span text:style-name="T1"> </text:span><text:span text:style-name="T2">(120/29) </text:span> ⲕⲉ ⲧⲉⲛⲟⲩ ⲙⲏⲡⲱⲥ ⲛ̅ⲥⲉⲣ̅ ϩⲁ̅ⲗ̅ ⲙ̅ⲙ’ⲟϥ ⲛ̅ⲑⲉ <text:line-break/><text:span text:style-name="T1"> </text:span><text:span text:style-name="T2">(120/30) </text:span> ⲙ̅ⲡϣⲏⲛ ⲛ̅ⲧⲅⲛⲱⲥⲓⲥ ⲛ̅ϥⲓ ⲟⲛ ⲉϩⲟⲩⲛ <text:line-break/><text:span text:style-name="T1"> </text:span><text:span text:style-name="T2">(120/31) </text:span> ⲉⲡϣⲏ’ⲛ ⲙ̅ⲡⲱⲛϩ ⲛ̅ϥⲟⲩⲱ’ⲙ ⲉⲃⲟⲗ ⲛ̅ϩⲏ’ⲧϥ <text:line-break/><text:span text:style-name="T1"> </text:span><text:span text:style-name="T2">(120/32) </text:span> ⲛ̅ϥϣⲱⲡⲉ ⲛ̅ⲁⲧⲙⲟ’ⲩ ⲛ̅ϥⲣ̅ ϫⲟ̣[ⲉⲓⲥ] ⲛ̅ϥⲕⲁⲧⲁ‐ <text:line-break/><text:span text:style-name="T1"> </text:span><text:span text:style-name="T2">(120/33) </text:span> ⲫⲣⲟⲛⲉⲓ ⲙ̅ⲙⲟⲛ ⲛ̅ϥⲃⲁⲃ[ⲱⲱⲛ ⲙ]ⲛ̅ ⲡⲛ̅ⲛⲉ‐ <text:line-break/><text:span text:style-name="T1"> </text:span><text:span text:style-name="T2">(120/34) </text:span> ⲟⲟ̣ⲩ ⲧⲏⲣ[ϥ] ⲙⲛ̅ⲛ̅ⲥⲱⲥ ϥⲛⲁⲣ̣̅[ⲕ]ⲁⲧⲁⲕⲣⲓⲛⲉ ⲙ̅‐ <text:line-break/><text:span text:style-name="T1"> </text:span><text:span text:style-name="T2">(120/35) </text:span> ⲙ̣[ⲟⲛ ⲙⲛ̅ ⲡⲛ̅ⲕⲟ]ⲥ̣ⲙⲟⲥ ⲁⲙⲏⲓ̈ⲧⲛ̅ ⲙⲁⲣⲛ̅ⲛ’ⲟϫϥ <text:line-break/><text:span text:style-name="T1"> </text:span><text:span text:style-name="T2">(121/1) </text:span> ⲉⲃⲟⲗ ϩⲙ̅ ⲡⲡⲁⲣⲁϫⲉⲓⲥⲟⲥ ⲉⲡⲓⲧⲛ̅ ⲉϫⲙ̅ ⲡⲕⲁϩ <text:line-break/><text:span text:style-name="T1"> </text:span><text:span text:style-name="T2">(121/2) </text:span> ⲡⲙⲁ ⲉⲛⲧⲁⲩⲛ̅ⲧϥ̅ ⲉⲃⲗ ⲛ̅ϩⲏ’ⲧϥ ϫⲉⲕⲁⲁⲥ ⲛ̅ⲛⲉϥ‐ <text:line-break/><text:span text:style-name="T1"> </text:span><text:span text:style-name="T2">(121/3) </text:span> ϣϭⲙ̅ ϭⲟ’ⲙ ϫⲓⲛ ⲧⲉⲛⲟⲩ ⲁⲥⲟⲩⲱ’ⲛ ⲗⲁⲁⲩ ⲛ̅ϩⲟⲩ‐ <text:line-break/><text:span text:style-name="T1"> </text:span><text:span text:style-name="T2">(121/4) </text:span> ⲟ ⲉⲣⲟⲛ ⲁⲩⲱ ⲛ̅ⲧⲉⲉⲓϩⲉ ⲁⲩⲛⲟ’ⲩϫ ⲁⲇⲁⲙ ⲉⲃⲟⲗ <text:line-break/><text:span text:style-name="T1"> </text:span><text:span text:style-name="T2">(121/5) </text:span> ϩⲙ̅ ⲡⲡⲁⲣⲁⲇⲓⲥⲟⲥ ⲙⲛ̅ ⲧⲉϥϩⲓⲙⲉ §ⲁⲩⲱ ⲙ̅ⲡⲉ ⲡⲁ‐ <text:line-break/><text:span text:style-name="T1"> </text:span><text:span text:style-name="T2">(121/6) </text:span> ⲉⲓ ⲣⲱϣⲉ ⲙ̅ⲙⲟⲟⲩ ⲛ̅ⲧⲁⲩⲁⲁϥ ⲁⲗⲗⲁ ⲛ̅ⲧⲁⲩⲣ̅ ϩⲟ‐ <text:line-break/><text:span text:style-name="T1"> </text:span><text:span text:style-name="T2">(121/7) </text:span> ⲧⲉ ⲁⲩⲉⲓ ⲉϩⲟⲩⲛ ⲉⲡϩϣⲏⲛ ⲙ̅ⲡⲱⲛϩ ⲁⲩⲧⲕⲧⲟ <text:line-break/><text:span text:style-name="T1"> </text:span><text:span text:style-name="T2">(121/8) </text:span> ⲛ̅ϩⲛ̅ⲛⲟϭ ⲛ̅ϩⲣ̅ⲧⲉ ⲉⲣ’ⲟϥ ϩⲛ̅ⲍⲱⲟ’ⲛ ⲛ̅ⲕⲱϩ’ⲧ <text:line-break/><text:span text:style-name="T1"> </text:span><text:span text:style-name="T2">(121/9) </text:span> ⲉⲩⲙⲟⲩⲧⲉ ⲉⲣⲟⲟⲩ ϫⲉ ⲭⲉⲣⲟⲩⲃⲓⲛ ⲁⲩⲱ ⲁⲩⲕⲱ <text:line-break/><text:span text:style-name="T1"> </text:span><text:span text:style-name="T2">(121/10) </text:span> ⲛ̅ⲟⲩⲥⲏϥⲉ ⲛ̅ⲥⲁⲧⲉ ϩⲛ̅ ⲧⲟⲩⲙⲏⲧⲉ ⲉⲥⲕ[ⲱ]ⲧ̣ⲉ̣ <text:line-break/><text:span text:style-name="T1"> </text:span><text:span text:style-name="T2">(121/11) </text:span> ⲛ̅ⲛⲁⲩ ⲛⲓⲙ ϩⲛ̅ⲛⲟⲩⲛⲟϭ ⲛ̅ϩⲣ̅ⲧⲉ ϣⲓⲛⲁ [ϫ]ⲉ̣ <text:line-break/><text:span text:style-name="T1"> </text:span><text:span text:style-name="T2">(121/12) </text:span> ⲛⲉ ⲗⲁⲁⲩ ⲉⲛⲉϩ ϩⲛ̅ 〈ⲣ̅〉ⲣⲙⲛ̅ⲕⲁϩ ⲃⲱⲕ ⲉϩⲟⲩ’ⲛ ⲉ‐ <text:line-break/><text:span text:style-name="T1"> </text:span><text:span text:style-name="T2">(121/13) </text:span> ⲡⲧⲟⲡⲟⲥ ⲉⲧⲙ̅ⲙⲁⲩ §ⲙ̅ⲙⲛ̅ⲛ̅ⲥⲁ ⲛⲁⲉ’ⲓ ⲛ̅ⲧⲁ‐ <text:line-break/><text:span text:style-name="T1"> </text:span><text:span text:style-name="T2">(121/14) </text:span> ⲣⲉ ⲛⲁⲣⲭⲱ’ⲛ ⲕⲱϩ ⲁⲁⲇⲁⲙ ⲁⲩⲟⲩⲱ’ϣ ⲁϭⲱϫⲃ̅ <text:line-break/><text:span text:style-name="T1"> </text:span><text:span text:style-name="T2">(121/15) </text:span> ⲛ̅ⲛⲟⲩⲭⲣⲟⲛⲟⲥ ⲙ̅ⲡⲟⲩϣϭⲙ̅ ϭⲟⲙ ⲉⲧⲃⲉ ϫⲓ‐ <text:line-break/><text:span text:style-name="T1"> </text:span><text:span text:style-name="T2">(121/16) </text:span> ⲙⲁⲣⲙⲉⲛⲏ ⲉⲧⲕⲏ ⲉϩⲣⲁⲓ̈ ϫⲓⲛ ⲛ̅ϣⲟⲣ’ⲡ ⲁⲩⲣ̅‐ <text:line-break/><text:span text:style-name="T1"> </text:span><text:span text:style-name="T2">(121/17) </text:span> ϩⲟⲣⲓⲥⲉ ⲅⲁ’ⲣ ⲛ̅ⲛⲟⲩⲭⲣⲟⲛⲟⲥ ⲙ̅ⲡⲟⲩⲁ ⲡⲟⲩⲁ <text:line-break/><text:span text:style-name="T1"> </text:span><text:span text:style-name="T2">(121/18) </text:span> ϣⲟ ⲣ̅ⲣⲟⲙⲡⲉ ⲕⲁⲧⲁ ⲡⲇⲣⲟⲙⲟⲥ ⲛ̅ⲛ̅ⲣⲉϥⲣ̅ ⲟⲩ‐ <text:line-break/><text:span text:style-name="T1"> </text:span><text:span text:style-name="T2">(121/19) </text:span> ⲟⲉⲓⲛ ⲙ̅ⲡⲟⲩϣϭⲙ̅ ϭⲟⲙ ⲇⲉ ⲛ̅ϭⲓ ⲛⲁⲣⲭⲱⲛ <text:line-break/><text:span text:style-name="T1"> </text:span><text:span text:style-name="T2">(121/20) </text:span> ⲁⲉⲓⲣⲉ ⲙ̅ⲡⲁⲉ’ⲓ ⲁⲡⲟⲩⲁ ⲡⲟⲩⲁ ϩⲛ̅ ⲛⲉϯⲣⲉ ⲙ̅‐ <text:line-break/><text:span text:style-name="T1"> </text:span><text:span text:style-name="T2">(121/21) </text:span> ⲡⲡⲉⲑⲟⲟⲩ ⲁⲩϭⲱϫⲃ̅ ⲙ̅ⲙⲏⲧⲉ ⲣ̅ⲣⲟⲙⲡⲉ <text:line-break/><text:span text:style-name="T1"> </text:span><text:span text:style-name="T2">(121/22) </text:span> ⲁⲩⲱ ⲡⲉⲓ̈ⲭⲣⲟⲛⲟⲥ ⲧⲏ’ⲣϥ ⲁϥⲣ̅ ⲯⲓ’ⲧ ⲛ̅ϣⲉ ⲙⲁ‐ <text:line-break/><text:span text:style-name="T1"> </text:span><text:span text:style-name="T2">(121/23) </text:span> ⲁⲃⲉ ⲛ̅ⲣⲟⲙⲡⲉ ⲁⲩⲱ ⲛⲁⲉⲓ ϩⲛ̅ ⲟⲩⲗⲩⲡⲏ ⲙⲛ̅ <text:line-break/><text:span text:style-name="T1"> </text:span><text:span text:style-name="T2">(121/24) </text:span> ⲟⲩⲙⲛ̅ⲧϭⲱⲃ ⲁⲩⲱ ϩⲛ̅ ϩⲙ̅ⲡⲉⲣⲓⲥⲡⲁⲥⲙⲟⲥ <text:line-break/><text:span text:style-name="T1"> </text:span><text:span text:style-name="T2">(121/25) </text:span> ⲙ̅ⲡⲟⲛⲏⲣⲟⲛ ⲁⲩⲱ ⲛ̅ⲧⲉⲉⲓϩⲉ ϫⲓⲙ ⲡϩⲟⲟⲩ <text:line-break/><text:span text:style-name="T1"> </text:span><text:span text:style-name="T2">(121/26) </text:span> ⲉⲧⲙ̅ⲙⲁⲩ ⲁⲡⲃⲓⲟⲥ ⲣ̅ⲕⲁⲧⲁⲛⲧⲁ ϣⲁ ⲧⲥⲩ’ⲛⲧⲉ‐ <text:line-break/><text:span text:style-name="T1"> </text:span><text:span text:style-name="T2">(121/27) </text:span> ⲗⲉⲓⲁ ⲙ̅ⲡⲁⲓⲱⲛ §ⲧⲟⲧⲉ ⲧⲥⲟⲫⲓⲁ ⲍⲱⲏ ⲛ̅ⲧⲁ‐ <text:line-break/><text:span text:style-name="T1"> </text:span><text:span text:style-name="T2">(121/28) </text:span> ⲣⲉⲥⲛⲁⲩ ϫⲉ ⲁⲛⲁⲣⲭⲱⲛ ⲙ̅ⲡⲕⲁⲕⲉ ϫⲉ ⲁⲩ‐ <text:line-break/><text:span text:style-name="T1"> </text:span><text:span text:style-name="T2">(121/29) </text:span> ⲥϩⲟⲩⲱⲣ ⲛⲉⲥϣⲃⲣ̅ⲉⲓⲛⲉ ⲁⲥⲣ̅ⲁⲅⲁⲛⲁⲕⲧⲉⲓ <text:line-break/><text:span text:style-name="T1"> </text:span><text:span text:style-name="T2">(121/30) </text:span> ⲁⲩⲱ ⲛ̅ⲧⲁⲣⲉⲥⲉⲓ ⲉⲃⲟⲗ ϩⲛ̅ ⲧϣⲟⲣ’ⲡ ⲙ̅ⲡⲉ ⲙⲛ̅ <text:line-break/><text:span text:style-name="T1"> </text:span><text:span text:style-name="T2">(121/31) </text:span> ⲇⲩⲛ̣ⲁ̣ⲙⲓⲥ̣ ⲛⲓ’ⲙ ⲁⲥⲣ̅ⲇⲓⲱⲕⲉ ⲛ̅ⲛⲓⲁⲣⲭⲱⲛ ⲉ‐ <text:line-break/><text:span text:style-name="T1"> </text:span><text:span text:style-name="T2">(121/32) </text:span> ⲃⲟⲗ ϩⲛ̣̅ [ⲛⲟⲩⲙ̅]ⲡⲏⲩⲉ ⲁⲩⲱ ⲁⲥⲛⲟϫⲟⲩ ⲉⲡⲓ‐ <text:line-break/><text:span text:style-name="T1"> </text:span><text:span text:style-name="T2">(121/33) </text:span> ⲧⲛ̅ ⲉⲡⲕⲟ̣[ⲥⲙⲟ]ⲥ ⲛ̅ⲣⲉϥⲣ̅ ⲛⲟⲃ̣ⲉ ϣⲓⲛⲁ̣ ⲉⲩ‐ <text:line-break/><text:span text:style-name="T1"> </text:span><text:span text:style-name="T2">(121/34) </text:span> ⲛⲁϣⲱⲡⲉ ⲙ̅ⲙⲁⲩ ⲛ̅ⲑⲉ ⲛ̅ⲛ̣ⲓ̣[ⲇ]ⲁ̣ⲓ̣ⲙⲱ̣ⲛ̣ <text:line-break/><text:span text:style-name="T1"> </text:span><text:span text:style-name="T2">(121/35) </text:span> ⲙ̅ⲡⲟⲛⲏⲣⲟⲥ ϩⲓϫⲙ̅ ⲡⲕⲁϩ §[........] <text:line-break/><text:span text:style-name="T1"> </text:span><text:span text:style-name="T2">(122/1) </text:span> ϫⲉⲕⲁⲁⲥ ⲧϣⲟ ⲣ̅ⲣⲟⲙⲡⲉ ⲉⲧϩⲙ̅ ⲡⲁⲣⲁⲇⲉⲓⲥⲟⲥ <text:line-break/><text:span text:style-name="T1"> </text:span><text:span text:style-name="T2">(122/2) </text:span> ⲉϥⲛⲁⲁⲩ ⲙ̅ⲡⲟⲩⲕⲟⲥⲙⲟⲥ ⲟⲩⲍⲱⲟⲛ ⲛ̅ⲉ’ⲙ‐ <text:line-break/><text:span text:style-name="T1"> </text:span><text:span text:style-name="T2">(122/3) </text:span> ⲯⲩⲭⲟⲛ ⲉⲩⲙⲟⲩⲧⲉ ⲉⲣ’ⲟϥ ϫⲉ ⲫⲟⲓⲛⲓⲝ ϣ’ⲁϥ‐ <text:line-break/><text:span text:style-name="T1"> </text:span><text:span text:style-name="T2">(122/4) </text:span> ⲙⲟⲟⲩ’ⲧϥ ⲟⲩⲁⲁ’ⲧϥ ⲛ̅ϥⲧⲛ̅ϩ’ⲟϥ ⲁⲩⲙⲛ̅ⲧⲣⲉ <text:line-break/><text:span text:style-name="T1"> </text:span><text:span text:style-name="T2">(122/5) </text:span> ⲙ̅ⲡⲟⲩϩⲁⲡ ϫⲉ ⲁⲩⲣ̅ⲁⲇⲓⲕⲉⲓ ⲛ̅ⲁⲇⲁ’ⲙ ⲙⲛ̅ ⲧⲉϥ̅‐ <text:line-break/><text:soft-page-break/><text:span text:style-name="T1"> </text:span><text:span text:style-name="T2">(122/6) </text:span> ⲅⲉⲛⲉⲁ ϣⲁ ⲧⲥⲩⲛⲧⲉⲗⲉⲓⲁ ⲙ̅ⲡⲁⲓⲱⲛ §〈....〉 ϣⲟⲙ’ⲧ <text:line-break/><text:span text:style-name="T1"> </text:span><text:span text:style-name="T2">(122/7) </text:span> ⲣ̅ⲣⲱⲙⲉ ⲛ’ⲉ ⲁⲩⲱ ⲛⲉϥⲅⲉⲛⲉⲁ ϣⲁ ⲧⲥⲩ’ⲛⲧⲉ‐ <text:line-break/><text:span text:style-name="T1"> </text:span><text:span text:style-name="T2">(122/8) </text:span> ⲗⲉⲓⲁ ⲙ̅ⲡⲕⲟⲥⲙⲟⲥ ⲡⲛⲉⲩⲙⲁⲧⲓⲕⲟⲥ ⲙ̅ⲡⲁⲓⲱⲛ <text:line-break/><text:span text:style-name="T1"> </text:span><text:span text:style-name="T2">(122/9) </text:span> ⲙⲛ̅ ⲡⲯⲩⲓ̈ⲕⲟⲥ ⲙⲛ̅ ⲡⲭⲟⲓ̈ⲕⲟⲥ §ⲧⲁⲉⲓ ⲧⲉ ⲑⲉ ⲙ̅‐ <text:line-break/><text:span text:style-name="T1"> </text:span><text:span text:style-name="T2">(122/10) </text:span> ⲡϣⲟⲙ’ⲧ ⲙ̅ⲫⲟⲓⲛⲓ’ⲝ 〈ⲙ̅〉ⲡⲡⲁⲣⲁⲇⲉⲓⲥⲟⲥ ⲡϣⲟⲣ’ⲡ <text:line-break/><text:span text:style-name="T1"> </text:span><text:span text:style-name="T2">(122/11) </text:span> [ⲟ ⲛ̅]ⲁ̣ⲑⲁⲛⲁⲧⲟⲥ ⲡⲙⲁϩⲥⲛⲁⲩ ϣⲁϥⲣ̅ ϣⲟ ⲣ̅‐ <text:line-break/><text:span text:style-name="T1"> </text:span><text:span text:style-name="T2">(122/12) </text:span> ⲣⲟ̣ⲙⲡⲉ ⲡⲙⲁϩϣⲟ’ⲙ’ⲧ ϥⲥⲏϩ ϩⲛ̅ ϫⲓⲉⲣⲁ ⲃⲓ‐ <text:line-break/><text:span text:style-name="T1"> </text:span><text:span text:style-name="T2">(122/13) </text:span> ⲃⲗⲟⲥ ϫⲉ ϣⲁⲩⲟⲩⲟⲙϥ̅ §ⲧⲉⲉⲓϩⲉ ⲟⲛ ⲟⲩⲛ̅ <text:line-break/><text:span text:style-name="T1"> </text:span><text:span text:style-name="T2">(122/14) </text:span> ϣⲟⲙ’ⲧ ⲛ̅ϫⲱⲕⲙ̅ ϣⲟⲟ’ⲡ ⲡϣⲟⲣ’ⲡ ⲡⲉ ⲡⲛⲉⲩ‐ <text:line-break/><text:span text:style-name="T1"> </text:span><text:span text:style-name="T2">(122/15) </text:span> ⲙⲁⲧⲓⲕⲟⲛ ⲡⲙⲁϩⲥⲛⲁⲩ ⲟⲩⲕⲱϩⲧ ⲡⲉ ⲡⲙⲁϩ‐ <text:line-break/><text:span text:style-name="T1"> </text:span><text:span text:style-name="T2">(122/16) </text:span> ϣⲟⲙ’ⲧ ⲟⲩⲙⲟⲟⲩ §ⲡⲉ ⲛ̅ⲑⲉ ⲙ̅ⲫⲟⲓⲛⲓ’ⲝ ’ⲉϥ‐ <text:line-break/><text:span text:style-name="T1"> </text:span><text:span text:style-name="T2">(122/17) </text:span> ⲟⲩⲟⲛϩ ⲉⲃⲟⲗ ϩⲱⲥ ⲙⲛ̅ⲧⲣⲉ ⲛ̅ⲛ̅ⲁⲅⲅⲉⲗⲟⲥ <text:line-break/><text:span text:style-name="T1"> </text:span><text:span text:style-name="T2">(122/18) </text:span> ⲧⲁⲉⲓ ⲧⲉ ⲑⲉ ⲛ̅ⲛ̅ϩⲩⲇⲣⲓⲁ ⲙ̅ⲙⲟⲟⲩ ⲉⲧϩⲛ̅ ⲕⲏ‐ <text:line-break/><text:span text:style-name="T1"> </text:span><text:span text:style-name="T2">(122/19) </text:span> ⲙⲉ ⲁⲥϣⲱⲡⲉ ⲁⲩⲙⲛ̅ⲧⲣⲉ ⲛ̅ⲛⲉⲧⲃⲏ’ⲕ ⲁⲡⲓ‐ <text:line-break/><text:span text:style-name="T1"> </text:span><text:span text:style-name="T2">(122/20) </text:span> ⲧⲛ̅ ⲁⲡϫⲱⲕⲙ̅ ⲛ̅ⲛⲟⲩⲣⲱⲙⲉ ⲛ̅ⲁⲗⲏⲑⲓⲛⲟⲥ <text:line-break/><text:span text:style-name="T1"> </text:span><text:span text:style-name="T2">(122/21) </text:span> §ⲡⲙⲁⲥⲉ ⲥⲛⲁⲩ ⲉⲧϩⲛ̅ ⲕⲏⲙⲉ ⲉⲩⲛ̅ⲧⲁⲩ ⲙ̅ⲙⲁⲩ <text:line-break/><text:span text:style-name="T1"> </text:span><text:span text:style-name="T2">(122/22) </text:span> ⲛ̅ⲟⲩⲙⲩⲥⲧⲏⲣⲓⲟⲛ ⲡⲣⲏ ⲙⲛ̅ ⲡⲟⲟϩ ⲉⲩϣⲟ‐ <text:line-break/><text:span text:style-name="T1"> </text:span><text:span text:style-name="T2">(122/23) </text:span> ⲟ’ⲡ ⲁⲩⲙⲛ̅ⲧⲣⲉ ⲛ̅ⲥⲁⲃ̅ⲁ̅ⲱ̅ⲑ̅ ϫⲉ ⲉϩⲣⲁⲓ̈ ⲉϫⲱ‐ <text:line-break/><text:span text:style-name="T1"> </text:span><text:span text:style-name="T2">(122/24) </text:span> ⲟⲩ ⲁⲥϫⲓ ⲛ̅ϭⲓ ⲧⲥⲟⲫⲓⲁ ⲙ̅ⲡⲕⲟⲥⲙⲟⲥ ϫⲓⲙ <text:line-break/><text:span text:style-name="T1"> </text:span><text:span text:style-name="T2">(122/25) </text:span> ⲫⲟⲟⲩ ⲛ̅ⲧⲁⲥⲧⲁⲙⲓⲟ ⲙ̅ⲡⲣⲏ ⲙⲛ̅ ⲡⲟⲟϩ ⲁⲥⲣ̅‐ <text:line-break/><text:span text:style-name="T1"> </text:span><text:span text:style-name="T2">(122/26) </text:span> ⲥⲫⲣⲁⲅⲓⲍⲉ ⲛ̅ⲧⲉⲥⲡⲉ ϣⲁ ϩⲟⲩ’ⲛ ⲁⲡⲁⲓⲱⲛ <text:line-break/><text:span text:style-name="T1"> </text:span><text:span text:style-name="T2">(122/27) </text:span> §ⲡϥⲛ̅ⲧ ⲇⲉ ⲛ̅ⲧⲁⲩϫⲡ’ⲟϥ ⲉⲃⲟⲗ ϩⲙ̅ ⲫⲟⲓⲛⲓ’ⲝ <text:line-break/><text:span text:style-name="T1"> </text:span><text:span text:style-name="T2">(122/28) </text:span> ⲟⲩⲣⲱⲙⲉ ⲁⲛ ⲡⲉ ϥⲥⲏϩ ⲉⲧⲃⲏ’ⲧϥ ϫⲉ ⲡⲇⲓ‐ <text:line-break/><text:span text:style-name="T1"> </text:span><text:span text:style-name="T2">(122/29) </text:span> ⲕⲁⲓⲟⲥ ⲛⲁϯ ⲟⲩⲱ ⲛ̅ⲑⲉ ⲛ̅ⲛⲟⲩⲫⲟⲓⲛⲓⲝ ⲁⲩⲱ <text:line-break/><text:span text:style-name="T1"> </text:span><text:span text:style-name="T2">(122/30) </text:span> ⲫⲟⲓⲛⲓ’ⲝ ϣ’ⲁϥⲟⲩⲱⲛϩ ⲉⲃⲟⲗ ⲛ̅ϣⲟⲣ’ⲡ ⲉϥ‐ <text:line-break/><text:span text:style-name="T1"> </text:span><text:span text:style-name="T2">(122/31) </text:span> ⲟⲛϩ ⲁⲩⲱ ϣⲁϥⲙⲟⲩ ⲡⲁⲗⲓⲛ ⲛ̅ϥⲧⲱⲟⲩⲛ <text:line-break/><text:span text:style-name="T1"> </text:span><text:span text:style-name="T2">(122/32) </text:span> ⲉϥϣⲟⲟ’ⲡ ⲛ̅ⲥⲏⲙⲉⲓⲟⲛ ⲙ̅ⲡⲉⲛⲧⲁ̣ϩ̣ⲟⲩⲱⲛϩ <text:line-break/><text:span text:style-name="T1"> </text:span><text:span text:style-name="T2">(122/33) </text:span> ⲉⲃⲟⲗ ϩⲛ̅ ⲧⲥⲩⲛⲧⲉⲗⲉⲓⲁ ⲙ̣̅[ⲡⲁⲓⲱⲛ] §ⲛⲉⲉⲓ‐ <text:line-break/><text:span text:style-name="T1"> </text:span><text:span text:style-name="T2">(122/34) </text:span> ⲛⲟϭ ⲛ̅ⲥⲏⲙⲉⲓⲟⲛ ⲛ̅ⲧⲁ[ⲩⲟⲩⲱ]ⲛϩ ⲉⲃⲟⲗ <text:line-break/><text:span text:style-name="T1"> </text:span><text:span text:style-name="T2">(122/35) </text:span> ϩ̣ⲛ̣̅ ⲕⲏⲙ̣[ⲉ] ⲟⲩⲁ’ⲁϥ ϩⲛ̅ ⲕⲉⲭⲱⲣⲁ ⲁⲛ ⲉϥⲥ’ⲏ‐ <text:line-break/><text:span text:style-name="T1"> </text:span><text:span text:style-name="T2">(123/1) </text:span> ⲙⲁⲛⲉ ϫⲉ ⲉⲥⲧⲛ̅ⲧⲱⲛ ⲉⲡⲡⲁⲣⲁⲇⲉⲓⲥⲟⲥ ⲙ̅ⲡⲛⲟⲩ‐ <text:line-break/><text:span text:style-name="T1"> </text:span><text:span text:style-name="T2">(123/2) </text:span> ⲧⲉ §ⲡⲁⲗⲓⲛ ⲙⲁⲣⲛ̅ⲉⲓ ⲉϩⲟⲩⲛ ⲉⲛⲁⲣⲭⲱⲛ ⲛ̅‐ <text:line-break/><text:span text:style-name="T1"> </text:span><text:span text:style-name="T2">(123/3) </text:span> ⲧⲁⲛϣⲁϫⲉ ⲉⲣⲟⲟⲩ ϫⲉⲕⲁⲁⲥ ⲉⲛⲁⲣ̅ⲡⲁⲣϩⲓⲥⲧⲁ <text:line-break/><text:span text:style-name="T1"> </text:span><text:span text:style-name="T2">(123/4) </text:span> ⲛ̅ⲧⲟⲩⲁⲡⲟⲇⲓⲝⲉⲓⲥ §ⲡⲓⲥⲟϣϥ ⲅⲁⲣ ⲛ̅ⲁⲣⲭⲱⲛ ⲛ̅‐ <text:line-break/><text:span text:style-name="T1"> </text:span><text:span text:style-name="T2">(123/5) </text:span> ⲧⲁⲣⲟⲩⲛⲟϫⲟⲩ ⲉⲃⲟⲗ ϩⲛ̅ ⲛⲟⲩⲙ̅ⲡⲏⲩⲉ ⲉⲡⲓ‐ <text:line-break/><text:span text:style-name="T1"> </text:span><text:span text:style-name="T2">(123/6) </text:span> ⲧⲛ̅ ⲉϫⲙ̅ ⲡⲕⲁ’ϩ ⲁⲩⲥⲱⲛⲧ ⲛⲁⲩ ⲛ̅ϩⲛ̅ⲁⲅⲅⲉⲗⲟⲥ <text:line-break/><text:span text:style-name="T1"> </text:span><text:span text:style-name="T2">(123/7) </text:span> ⲉⲧⲉ ϩⲁϩ ⲛⲉ ⲛ̅ⲇⲁⲓⲙⲱⲛ ⲁⲧⲣⲟⲩⲣ̅ϩⲩⲡⲏⲣⲉⲧⲉⲓ <text:line-break/><text:span text:style-name="T1"> </text:span><text:span text:style-name="T2">(123/8) </text:span> ⲛⲁⲩ ⲛⲁⲉⲓ ⲇⲉ ⲁⲩⲧⲥⲉⲃⲉ ⲣ̅ⲣⲱⲙⲉ ⲁϩⲁϩ ⲙ̅ⲡⲗⲁ‐ <text:line-break/><text:span text:style-name="T1"> </text:span><text:span text:style-name="T2">(123/9) </text:span> ⲛⲏ ϩⲓ ⲙⲁⲅⲉⲓⲁ ϩⲓ ⲫⲁⲣⲙⲁⲕⲓⲁ ϩⲓ ⲙ̅ⲛ̅ⲧϣⲙ̅ϣⲉ <text:line-break/><text:span text:style-name="T1"> </text:span><text:span text:style-name="T2">(123/10) </text:span> ⲉⲓⲇⲱⲗⲟ’ⲛ ϩⲓ ⲡⲉⲧϩ ⲥⲛ’ⲟϥ ⲉⲃⲟⲗ ϩⲓ ϣⲏⲩⲉ ϩⲓ <text:line-break/><text:span text:style-name="T1"> </text:span><text:span text:style-name="T2">(123/11) </text:span> ⲣ̅ⲡⲉ ϩⲓ ⲑⲩⲥⲓⲁ ϩⲓ ⲥⲡⲟⲛⲇⲏ ⲛ̅ⲛ̅ⲇⲁⲓⲙⲱⲛ <text:line-break/><text:span text:style-name="T1"> </text:span><text:span text:style-name="T2">(123/12) </text:span> ⲧⲏⲣⲟⲩ ⲙ̅ⲡⲕⲁϩ ⲉⲩⲛ̅ⲧⲁⲩ ⲙ̅ⲙⲁⲩ ⲛ̅ⲧⲟⲩϣⲃⲣ̅‐ <text:line-break/><text:span text:style-name="T1"> </text:span><text:span text:style-name="T2">(123/13) </text:span> ⲣ̅ ϩⲱⲃ ⲇⲓⲙⲁⲣⲙⲉⲛⲏ ⲧⲁⲉⲓ ⲛ̅ⲧⲁϩϣⲱⲡⲉ ⲕⲁ‐ <text:line-break/><text:span text:style-name="T1"> </text:span><text:span text:style-name="T2">(123/14) </text:span> ⲧⲁ ⲧⲥⲩ’ⲙⲫⲱⲛⲓⲁ ϩⲓⲧⲛ̅ ⲛ̅ⲛⲟⲩⲧⲉ ⲛ̅ⲧⲁⲇⲓⲕⲉⲓⲁ <text:line-break/><text:span text:style-name="T1"> </text:span><text:span text:style-name="T2">(123/15) </text:span> ⲙⲛ̅ ⲧⲇⲓⲕⲁⲓⲟⲥⲩⲛⲏ §ⲁⲩⲱ ⲛ̅ⲧⲉⲉⲓϩⲉ ⲛ̅ⲧⲁⲣⲉ ⲡⲕⲟⲥ‐ <text:line-break/><text:span text:style-name="T1"> </text:span><text:span text:style-name="T2">(123/16) </text:span> ⲙⲟⲥ ϣⲱⲡⲉ ϩⲛ̅ ⲛⲟⲩϫⲓ ϩⲣ’ⲁϥ ⲁϥⲣ̅ⲡⲗⲁⲛⲁⲥ‐ <text:line-break/><text:span text:style-name="T1"> </text:span><text:span text:style-name="T2">(123/17) </text:span> ⲑⲉ ϩⲙ̅ ⲡⲭⲣⲟⲛⲟⲥ ⲧⲏ’ⲣϥ ⲁⲛⲣⲱⲙⲉ ⲅⲁⲣ ⲧⲏⲣⲟⲩ <text:line-break/><text:soft-page-break/><text:span text:style-name="T1"> </text:span><text:span text:style-name="T2">(123/18) </text:span> ⲉⲧϩⲓϫⲙ̅ ⲡⲕⲁϩ ⲁⲩϣⲙ̅ϣⲉ ⲛ̅ⲛ̅ⲇⲁⲓⲙⲱⲛ ϫⲓⲛ <text:line-break/><text:span text:style-name="T1"> </text:span><text:span text:style-name="T2">(123/19) </text:span> ⲧⲕⲁⲧⲁⲃⲟⲗⲏ ϣⲁ ⲧⲥⲩⲛⲧⲉⲗⲉⲓⲁ ⲛ̅ⲁⲅⲅⲉⲗⲟⲥ <text:line-break/><text:span text:style-name="T1"> </text:span><text:span text:style-name="T2">(123/20) </text:span> ⲙⲉⲛ ⲛ̅ⲧⲇⲓⲕⲁⲓⲟⲥⲩⲛⲏ ⲙⲛ̅ ⲛ̅ⲣⲱⲙⲉ ⲛ̅ⲧⲁⲇⲓ‐ <text:line-break/><text:span text:style-name="T1"> </text:span><text:span text:style-name="T2">(123/21) </text:span> ⲕⲓⲁ ⲧⲉⲉⲓϩⲉ ⲁⲡⲕⲟⲥⲙⲟⲥ ϣⲱⲡⲉ ϩⲛ̅ⲛⲟⲩ‐ <text:line-break/><text:span text:style-name="T1"> </text:span><text:span text:style-name="T2">(123/22) </text:span> ϫⲓ ϩⲣ’ⲁϥ ϩⲛ̅ⲛⲟⲩⲙ̅ⲛ̅ⲧⲁⲧⲥⲟⲟⲩⲛ ⲙⲛ̅ⲛⲟⲩⲃ̅‐ <text:line-break/><text:span text:style-name="T1"> </text:span><text:span text:style-name="T2">(123/23) </text:span> ϣⲉ ⲁⲩⲡⲗⲁⲛⲁ ⲧⲏⲣⲟⲩ ϣⲁ ϩⲟⲩⲛ ⲁⲧⲡⲁⲣⲟⲩⲥⲓⲁ <text:line-break/><text:span text:style-name="T1"> </text:span><text:span text:style-name="T2">(123/24) </text:span> ⲙ̅ⲡⲣⲱⲙⲉ ⲛ̅ⲁⲗⲏⲑⲓⲛⲟⲥ §ⲟⲩⲁϣⲣⲉ ⲉⲣⲱⲧⲛ̅ <text:line-break/><text:span text:style-name="T1"> </text:span><text:span text:style-name="T2">(123/25) </text:span> ϣⲁ ⲛⲉⲉⲓⲙⲁ ⲉⲓⲧⲁ ⲧⲛ̅ⲛⲏⲩ ⲉϩⲟⲩⲛ ⲉⲡⲛ̅ⲕⲟⲥ‐ <text:line-break/><text:span text:style-name="T1"> </text:span><text:span text:style-name="T2">(123/26) </text:span> ⲙⲟⲥ ϫⲉⲕⲁⲁⲥ ⲉⲛⲁϫⲱ’ⲕ ⲉⲃⲟ’ⲗ ⲛ̅ⲧ’ⲉϥⲥⲩⲥⲧⲁ‐ <text:line-break/><text:span text:style-name="T1"> </text:span><text:span text:style-name="T2">(123/27) </text:span> ⲥⲓⲥ ⲙⲛ̅ ⲧ’ⲉϥⲇⲓⲟⲓⲕⲏⲥⲓⲥ ⲕⲁⲧⲁ ⲟⲩⲙⲛ̅ⲧⲁⲕⲣⲓ‐ <text:line-break/><text:span text:style-name="T1"> </text:span><text:span text:style-name="T2">(123/28) </text:span> ⲃⲏⲥ §ⲧⲟⲧⲉ ϥⲛⲁⲟⲩⲱⲛϩ ⲉⲃⲟⲗ ⲛ̅ⲑⲉ ⲉⲛⲧⲁⲩ‐ <text:line-break/><text:span text:style-name="T1"> </text:span><text:span text:style-name="T2">(123/29) </text:span> ϩⲉ ⲉⲧⲡⲓⲥⲧⲓⲥ ⲛ̅ⲛⲉⲑⲏ’ⲡ ⲛⲉⲧⲟⲩⲟⲛϩ ⲉⲃⲟⲗ <text:line-break/><text:span text:style-name="T1"> </text:span><text:span text:style-name="T2">(123/30) </text:span> ϫⲓⲛ ⲧⲕⲁⲧⲁⲃⲟⲗ’ⲏ ϣⲁ ϩⲟⲩⲛ ⲁⲧⲥⲩⲛⲧⲉⲗⲉⲓⲁ <text:line-break/><text:span text:style-name="T1"> </text:span><text:span text:style-name="T2">(123/31) </text:span> ⲙ̅ⲡⲁ̣[ⲓ]ⲱ̣ⲛ §ϯ̣ⲛ̅ⲛⲏⲩ ⲇⲉ ⲉϩⲟⲩⲛ ⲉⲛⲕⲉⲫⲁⲗⲁⲓⲟⲛ <text:line-break/><text:span text:style-name="T1"> </text:span><text:span text:style-name="T2">(123/32) </text:span> ⲉⲧϫⲓ ⲉ̣[ϩⲟⲩⲛ ⲉ]ⲡⲣⲱⲙⲉ ⲛ̅ⲁⲑⲁⲛⲁⲧⲟⲥ ϯⲛⲁ‐ <text:line-break/><text:span text:style-name="T1"> </text:span><text:span text:style-name="T2">(123/33) </text:span> ϣⲁϫⲉ ⲉⲛ̣[ⲉⲧⲉ] ⲛⲟ’ⲩϥ ⲧⲏⲣⲟⲩ ϫⲉ ⲉⲧⲃⲉ ⲟⲩ <text:line-break/><text:span text:style-name="T1"> </text:span><text:span text:style-name="T2">(123/34) </text:span> ⲛ̅ⲥⲙⲟ’ⲧ ⲉⲩⲛ̅ⲛⲉⲉⲓⲙⲁ §ⲛ̅ⲧ̣ⲁ̣[ⲣⲉ ⲟ]ⲩ̣ⲙ̣[ⲏ]ⲏ‐ <text:line-break/><text:span text:style-name="T1"> </text:span><text:span text:style-name="T2">(123/35) </text:span> ϣⲉ ⲣ̅ⲣⲱⲙⲉ ϣⲱⲡⲉ ⲉⲃⲟ̣[ⲗ ϩⲛ̅ ⲁⲇⲁⲙ ⲡⲁⲓ̈] <text:line-break/><text:span text:style-name="T1"> </text:span><text:span text:style-name="T2">(124/1) </text:span> ⲛ̅ⲧⲁⲩⲡⲗⲁⲥⲥⲉ ⲙ̅ⲙ’ⲟϥ ⲁⲩⲱ ⲉⲃⲟⲗ ϩⲛ̅ ⲑⲩⲗ’ⲏ <text:line-break/><text:span text:style-name="T1"> </text:span><text:span text:style-name="T2">(124/2) </text:span> ⲏⲇⲏ ⲛ̅ⲧⲁⲣⲉ ⲡⲕⲟⲥⲙⲟⲥ ⲙⲟⲩϩ ⲁⲛⲁⲣⲭⲱⲛ ⲣ̅ ϫⲟ‐ <text:line-break/><text:span text:style-name="T1"> </text:span><text:span text:style-name="T2">(124/3) </text:span> ⲉⲓⲥ ⲉϩⲣⲁⲓ̈ ⲉϫ’ⲱϥ ⲉⲧⲉ ⲡⲁⲉⲓ ⲡⲉ ⲁⲩⲕⲁⲧⲉⲭⲉ ⲙ̅‐ <text:line-break/><text:span text:style-name="T1"> </text:span><text:span text:style-name="T2">(124/4) </text:span> ⲙ’ⲟϥ ϩⲛ̅ ⲟⲩⲙ̅ⲛ̅ⲧⲁⲧⲥⲟⲟⲩⲛ §ⲁϣ ⲡⲉ ⲡⲁⲓⲧⲓⲟⲛ <text:line-break/><text:span text:style-name="T1"> </text:span><text:span text:style-name="T2">(124/5) </text:span> ⲡⲁⲉⲓ ⲡⲉ ⲉⲡⲉⲓ ⲡⲉⲓⲱ’ⲧ ⲛ̅ⲁⲑⲁⲛⲁⲧⲟⲥ ⲥⲟⲟⲩⲛ <text:line-break/><text:span text:style-name="T1"> </text:span><text:span text:style-name="T2">(124/6) </text:span> ϫⲉ ⲁⲩϣⲧⲁ ϣⲱⲡⲉ ⲉⲃⲟⲗ ϩⲛ̅ ⲧⲙⲉ ϩⲣⲁⲓ̈ ϩⲛ̅ ⲛⲁⲓ‐ <text:line-break/><text:span text:style-name="T1"> </text:span><text:span text:style-name="T2">(124/7) </text:span> ⲱ’ⲛ ⲙⲛ̅ ⲡⲟⲩⲕⲟⲥⲙⲟⲥ ⲉⲧⲃⲉ ⲡⲁⲓ̈ ⲛ̅ⲧⲁⲣ’ⲉϥⲟⲩ‐ <text:line-break/><text:span text:style-name="T1"> </text:span><text:span text:style-name="T2">(124/8) </text:span> ⲱϣ ⲁⲟⲩⲱⲥϥ ⲛ̅ⲛ̅ⲁⲣⲭⲱ’ⲛ ⲙ̅ⲡⲧⲁⲕⲟ ϩⲓⲧⲛ ⲛⲟⲩ‐ <text:line-break/><text:span text:style-name="T1"> </text:span><text:span text:style-name="T2">(124/9) </text:span> ⲡⲗⲁⲥⲙⲁ ⲁϥϫⲟⲟⲩ ⲛ̅ⲛⲉⲧⲛ̅ⲉⲓⲛⲉ ⲉϩⲣⲁⲓ̈ ⲉⲡⲕⲟⲥ‐ <text:line-break/><text:span text:style-name="T1"> </text:span><text:span text:style-name="T2">(124/10) </text:span> ⲙⲟⲥ ⲙ̅ⲡⲧⲁⲕⲟ ⲉⲧⲉ ⲛⲁⲉⲓ ⲛⲉ ⲙ̅ⲡⲛ̅ⲁ̅ ⲛ̅ⲃⲁⲗϩⲏ’ⲧ <text:line-break/><text:span text:style-name="T1"> </text:span><text:span text:style-name="T2">(124/11) </text:span> ⲛ̅ⲕⲟⲩⲉⲓ ⲙ̅ⲙⲁⲕⲁⲣⲓⲟⲥ ⲥⲉⲟ ⲁⲛ ⲛ̅ϣⲙ̅ⲙⲟ ⲉ’ⲧ‐ <text:line-break/><text:span text:style-name="T1"> </text:span><text:span text:style-name="T2">(124/12) </text:span> ⲅⲛⲱⲥⲓⲥ §ⲧⲅⲛⲱⲥⲓⲥ ⲅⲁⲣ ⲧⲏⲣⲥ̅ ϩⲛ̅ⲛⲟⲩⲁ’ⲅⲅⲉⲗⲟⲥ <text:line-break/><text:span text:style-name="T1"> </text:span><text:span text:style-name="T2">(124/13) </text:span> † ⲉⲧⲟⲩⲟⲛϩ ⲉⲃⲟⲗ ϩⲓ ⲧⲟⲩⲉϩⲏ ⲡⲁⲉⲓ ⲟⲩⲁⲧϭⲟ’ⲙ <text:line-break/><text:span text:style-name="T1"> </text:span><text:span text:style-name="T2">(124/14) </text:span> ⲁⲛ ⲡⲉ ⲛ̅ⲛⲁϩⲣⲙ̅ ⲡⲉⲓⲱ’ⲧ ⲁⲩⲱ ⲁ〈ϥ〉ϯ ⲛⲁⲩ ⲛ̅ⲧⲅⲛⲱ‐ <text:line-break/><text:span text:style-name="T1"> </text:span><text:span text:style-name="T2">(124/15) </text:span> ⲥⲓⲥ [ⲧⲅⲛⲱⲥⲓⲥ ⲅⲁⲣ ⲧⲏⲣⲥ̅ ϩⲛ̅ⲛⲟⲩⲁ’ⲅⲅⲉⲗⲟⲥ <text:line-break/><text:span text:style-name="T1"> </text:span><text:span text:style-name="T2">(124/16) </text:span> ⲉⲧⲟⲩⲟⲛϩ ⲉⲃⲟⲗ%2 ϩⲓⲧⲟⲩⲉϩⲏ ⲡⲁⲉⲓ ⲟⲩⲁⲧϭⲟ’ⲙ <text:line-break/><text:span text:style-name="T1"> </text:span><text:span text:style-name="T2">(124/17) </text:span> ⲁⲛ ⲡⲉ ⲛ̅ⲛⲁϩⲣⲙ̅ ⲡⲉⲓⲱ’ⲧ ⲁⲩⲱ ⲁϯ ⲛⲁⲩ ⲛ̅ⲧⲅⲛⲱ‐ <text:line-break/><text:span text:style-name="T1"> </text:span><text:span text:style-name="T2">(124/18) </text:span> ⲥⲓⲥ] §ⲛ̅ⲧⲉⲩⲛⲟⲩ ⲉⲩϣⲁⲟⲩⲱⲛϩ ⲉⲃⲟⲗ ϩⲙ̅ ⲡⲕⲟⲥ‐ <text:line-break/><text:span text:style-name="T1"> </text:span><text:span text:style-name="T2">(124/19) </text:span> ⲙⲟⲥ ⲙ̅ⲡⲧⲁⲕⲟ ⲥⲉⲛⲁϭⲱⲗ’ⲡ ⲉⲃⲟⲗ ⲛ̅ϣⲟⲣ’ⲡ ⲙ̅‐ <text:line-break/><text:span text:style-name="T1"> </text:span><text:span text:style-name="T2">(124/20) </text:span> ⲡⲧⲩⲡⲟⲥ ⲛ̅ⲧⲙⲛ̅ⲧⲁ’ⲧⲧⲁⲕⲟ ⲁⲩⲕⲁⲧⲁⲕⲣⲓⲥⲓⲥ <text:line-break/><text:span text:style-name="T1"> </text:span><text:span text:style-name="T2">(124/21) </text:span> ⲛ̅ⲛ̅ⲁⲣⲭⲱⲛ ⲙⲛ̅ ⲛⲟⲩⲇⲩⲛⲁⲙⲓⲥ §ⲛ̅ⲧⲁⲣⲉ ⲙ̅ⲙⲁ‐ <text:line-break/><text:span text:style-name="T1"> </text:span><text:span text:style-name="T2">(124/22) </text:span> ⲕⲁⲣⲓⲟⲥ ϭⲉ ⲟⲩⲱⲛϩ ⲉⲃⲟ’ⲗ ϩⲛ̅ ⲡⲗⲁⲥⲙⲁ ⲛ̅ⲉ‐ <text:line-break/><text:span text:style-name="T1"> </text:span><text:span text:style-name="T2">(124/23) </text:span> ⲝⲟⲩⲥⲓⲁ ⲁⲩⲕⲱϩ ⲉⲣⲟⲟⲩ ⲁⲛⲉⲝⲟⲩⲥⲓⲁ ⲇⲉ ⲉⲧⲃⲉ <text:line-break/><text:span text:style-name="T1"> </text:span><text:span text:style-name="T2">(124/24) </text:span> ⲡⲕⲱϩ ⲁⲩⲧⲱϩ ⲛ̅ⲛⲟⲩⲥⲡⲉⲣⲙ’ⲁ ⲛⲙ̅ⲙⲁⲩ ⲁⲧⲣⲟⲩ‐ <text:line-break/><text:span text:style-name="T1"> </text:span><text:span text:style-name="T2">(124/25) </text:span> ϫⲁϩⲙⲟⲩ ⲙ̅ⲡⲟⲩϣϭⲙ̅ ϭⲟ’ⲙ §ⲙ̅ⲙⲁⲕⲁⲣⲓⲟ’ⲥ <text:line-break/><text:span text:style-name="T1"> </text:span><text:span text:style-name="T2">(124/26) </text:span> ϭⲉ ⲛ̅ⲧⲁⲣⲟⲩⲱⲛϩ ⲉⲃⲟⲗ ϩⲛ̅ⲛⲟⲩⲟⲉⲓⲛ ⲕⲁⲧⲁ <text:line-break/><text:span text:style-name="T1"> </text:span><text:span text:style-name="T2">(124/27) </text:span> ⲇⲓⲁⲫⲟⲣⲁ ⲁⲩⲟⲩⲱⲛϩ ⲉⲃⲟⲗ ⲁⲩⲱ ⲡⲟⲩⲁ ⲡⲟⲩⲁ <text:line-break/><text:span text:style-name="T1"> </text:span><text:span text:style-name="T2">(124/28) </text:span> ⲛ̅ϩⲏⲧⲟⲩ ⲉⲃⲟⲗ ϩⲙ̅ ⲡⲟⲩⲕⲁϩ ⲁⲩϭⲱⲗ’ⲡ ⲉⲃⲟⲗ <text:line-break/><text:span text:style-name="T1"> </text:span><text:span text:style-name="T2">(124/29) </text:span> ⲛ̅ⲧⲟⲩⲅⲛⲱⲥⲓⲥ ⲛ̅ⲧⲉ’ⲕⲕⲗⲏⲥⲓⲁ ⲛ̅ⲧⲁϩⲟⲩⲱⲛϩ <text:line-break/><text:soft-page-break/><text:span text:style-name="T1"> </text:span><text:span text:style-name="T2">(124/30) </text:span> ⲉⲃⲟⲗ ϩⲛ̅ⲛⲙ̅ⲡⲗⲁⲥⲙⲁ ⲙ̅ⲡⲧⲁⲕ’ⲟ ⲁⲩϩⲉ ⲉ‐ <text:line-break/><text:span text:style-name="T1"> </text:span><text:span text:style-name="T2">(124/31) </text:span> ⲣⲟⲥ ⲉⲩⲛ̅ⲧⲁⲥ ⲥⲡⲉⲣⲙⲁ ⲛⲓ’ⲙ ⲉⲧⲃⲉ ⲛ̣̅[ⲥ]ⲡⲉⲣ‐ <text:line-break/><text:span text:style-name="T1"> </text:span><text:span text:style-name="T2">(124/32) </text:span> ⲙⲁ ⲛ̅ⲉⲝⲟⲩⲥⲓⲁ ⲛ̅ⲧⲁϩⲧⲱ[ϩ ⲛⲙ̅ⲙⲁⲥ] §ⲧⲟ[ⲧ]ⲉ <text:line-break/><text:span text:style-name="T1"> </text:span><text:span text:style-name="T2">(124/33) </text:span> ⲡⲥⲱⲧⲏ’ⲣ ⲁϥⲧⲁⲙⲓⲟ ⲛ̅ⲟ[ⲩ.....]ⲉ̣ⲓ ⲉⲃⲟⲗ <text:line-break/><text:span text:style-name="T1"> </text:span><text:span text:style-name="T2">(124/34) </text:span> ⲛ̅[ϩ]ⲏⲧⲟⲩ [ⲧ]ⲏⲣⲟⲩ ⲁⲩⲱ ⲙ̅ⲡ̅ⲛ̅ⲁ̣̅̅ ⲛ̅ⲛⲁⲉⲓ ⲟⲩ‐ <text:line-break/><text:span text:style-name="T1"> </text:span><text:span text:style-name="T2">(124/35) </text:span> [ⲟⲛϩ ⲉⲃⲟⲗ ⲉⲩⲥ]ⲟⲧ’ⲡ ⲉⲩⲟ ⲙ̅ⲙⲁⲕⲁⲣⲓⲟ’ⲥ <text:line-break/><text:span text:style-name="T1"> </text:span><text:span text:style-name="T2">(125/1) </text:span> ⲁⲩⲱ ⲉⲩϣⲃⲉⲓⲟⲉⲓ’ⲧ ⲁⲛⲉ’ⲕⲗⲟⲅⲏ ⲁⲩⲱ ϩⲛ̅‐ <text:line-break/><text:span text:style-name="T1"> </text:span><text:span text:style-name="T2">(125/2) </text:span> ⲕⲟⲟⲩⲉ ⲉⲛⲁϣⲱⲟⲩ ⲉⲩⲟ ⲛ̅ⲁⲧⲣ̅ⲣⲟ ⲉⲩⲥⲟⲧ’ⲡ <text:line-break/><text:span text:style-name="T1"> </text:span><text:span text:style-name="T2">(125/3) </text:span> ⲁⲟⲩⲟⲛ ⲛⲓⲙ ⲉⲧϩⲓ ⲧⲟⲩⲉϩⲏ §ϩⲱⲥⲧⲉ ⲟⲩⲛ̅ ϥⲧⲟ‐ <text:line-break/><text:span text:style-name="T1"> </text:span><text:span text:style-name="T2">(125/4) </text:span> ⲟⲩ ⲛ̅ⲅⲉⲛⲟⲥ ϣⲟⲟ’ⲡ ⲟⲩⲛ̅ ϣⲟⲙⲧ ⲉⲧⲏ’ⲡ ⲁⲛⲣ̅‐ <text:line-break/><text:span text:style-name="T1"> </text:span><text:span text:style-name="T2">(125/5) </text:span> ⲣⲱⲟⲩ ⲛ̅ⲧⲁⲙⲁϩϣⲙⲟⲩⲛⲉ ⲡⲙⲁϩϥⲧⲟⲟⲩ ⲇⲉ <text:line-break/><text:span text:style-name="T1"> </text:span><text:span text:style-name="T2">(125/6) </text:span> ⲛ̅ⲅⲉⲛⲟⲥ ⲟⲩⲁ’ⲧⲣ̅ⲣⲟ ⲡⲉ ⲛ̅ⲧⲉⲗⲉⲓⲟⲛ ⲉϥⲙ̅‐ <text:line-break/><text:span text:style-name="T1"> </text:span><text:span text:style-name="T2">(125/7) </text:span> ⲡⲟⲩⲥⲁ ⲛϩⲣⲉ ⲧⲏⲣⲟⲩ §ⲛⲁⲉⲓ ⲅⲁⲣ ⲉⲩⲛⲁⲃⲱⲕ† <text:line-break/><text:span text:style-name="T1"> </text:span><text:span text:style-name="T2">(125/8) </text:span> ⲉϩⲟⲩ’ⲛ ⲉⲡⲧⲟⲡⲟⲥ ⲉⲧⲟⲩⲁⲁⲃ ⲙ̅ⲡⲟⲩⲉⲓⲱ’ⲧ <text:line-break/><text:span text:style-name="T1"> </text:span><text:span text:style-name="T2">(125/9) </text:span> ⲁⲩⲱ ⲥⲉⲛⲁⲙ̅ⲧⲟⲛ ⲙ̅ⲙⲟⲟⲩ ϩⲛ̅ ⲟⲩⲁⲛⲁⲡⲁⲩ‐ <text:line-break/><text:span text:style-name="T1"> </text:span><text:span text:style-name="T2">(125/10) </text:span> ⲥⲓⲥ ⲙⲛ̅ⲛⲟⲩⲉⲟⲟⲩ ϣⲁ ⲉⲛⲉϩ ⲉⲙⲁⲩϣϣⲁϫⲉ <text:line-break/><text:span text:style-name="T1"> </text:span><text:span text:style-name="T2">(125/11) </text:span> ⲉⲣⲟϥ ⲁⲩⲱ ϩⲛ̅ ⲟⲩⲣⲁϣⲉ ⲁϫⲛ̅ ⲱϫⲛ̅ §ⲥⲉⲟ ⲇⲉ <text:line-break/><text:span text:style-name="T1"> </text:span><text:span text:style-name="T2">(125/12) </text:span> ⲛ̅ⲣ̅ⲣⲟ ϩⲙ̅ ⲡⲑⲛⲏⲧⲟⲛ ϩⲱⲥ ⲁⲑⲁⲛⲁⲧⲟⲥ ⲥⲉ‐ <text:line-break/><text:span text:style-name="T1"> </text:span><text:span text:style-name="T2">(125/13) </text:span> ⲛⲁⲣ̅ⲕⲁⲧⲁⲕⲣⲓⲛⲉ ⲛ̅ⲛ̅ⲛⲟⲩⲧⲉ ⲙ̅ⲡⲭⲁⲟⲥ ⲙⲛ̅ <text:line-break/><text:span text:style-name="T1"> </text:span><text:span text:style-name="T2">(125/14) </text:span> ⲛⲟⲩⲇⲩⲛⲁⲙⲓⲥ §ⲡⲗⲟⲅⲟⲥ ϭⲉ ⲉⲧϫⲟⲥⲉ ⲉⲟⲩ‐ <text:line-break/><text:span text:style-name="T1"> </text:span><text:span text:style-name="T2">(125/15) </text:span> ⲟⲛ ⲛⲓⲙ ⲁⲩⲧⲛ̅ⲛⲟⲟ’ⲩϥ ⲉⲡⲉⲉⲓϩⲱⲃ ⲙⲟⲛⲟⲛ <text:line-break/><text:span text:style-name="T1"> </text:span><text:span text:style-name="T2">(125/16) </text:span> ⲁⲧⲣⲉϥⲣ̅ⲕⲏⲣⲩⲥⲥⲉ ⲉⲧⲃⲉ ⲡⲉⲧⲟⲩⲥⲟⲟⲩⲛ ⲁⲛ <text:line-break/><text:span text:style-name="T1"> </text:span><text:span text:style-name="T2">(125/17) </text:span> ⲙ̅ⲙⲟϥ ⟦ϫ⟧ ⲡⲉϫ’ⲁϥ ϫⲉ ⲙⲛ̅ ⲡⲉⲑⲏ’ⲡ ⲉⲧⲟⲩ‐ <text:line-break/><text:span text:style-name="T1"> </text:span><text:span text:style-name="T2">(125/18) </text:span> ⲟⲛϩ ⲉⲃⲟⲗ ⲁⲛ ⲁⲩⲱ ⲡⲉⲧⲉ ⲙ̅ⲡⲟⲩⲥⲟⲩⲱ’ⲛϥ <text:line-break/><text:span text:style-name="T1"> </text:span><text:span text:style-name="T2">(125/19) </text:span> ⲥⲉⲛⲁⲥⲟⲩⲱ’ⲛϥ §ⲛⲁⲉⲓ ⲇⲉ ⲁⲩⲧⲛ̅ⲛⲟⲟⲩⲥⲉ <text:line-break/><text:span text:style-name="T1"> </text:span><text:span text:style-name="T2">(125/20) </text:span> ⲁⲧⲣⲟⲩⲟⲩⲱⲛ’ϩ ⲉⲃⲟⲗ ϩⲙ̅ⲡⲡⲉⲑⲏ’ⲡ ⲙⲛ̅ <text:line-break/><text:span text:style-name="T1"> </text:span><text:span text:style-name="T2">(125/21) </text:span> ⲧⲥⲁϣϥⲉ ⲛ̅ⲉⲝⲟⲩⲥⲓⲁ ⲙ̅ⲡⲭⲁⲟⲥ ⲙⲛ̅ ⲧⲟⲩ‐ <text:line-break/><text:span text:style-name="T1"> </text:span><text:span text:style-name="T2">(125/22) </text:span> ⲙⲛ̅ⲧⲁⲥⲉⲃⲏⲥ ⲁⲩⲱ ⲧⲉⲉⲓϩⲉ ⲁⲩⲕⲁⲧⲁⲕⲣⲓ‐ <text:line-break/><text:span text:style-name="T1"> </text:span><text:span text:style-name="T2">(125/23) </text:span> ⲛⲉ ⲙ̅ⲙⲟⲟⲩ ⲉⲙⲟⲟⲩⲧⲟⲩ §ⲛ̅ⲧⲁⲣⲉ ⲛ̅ⲧⲉⲗⲉⲓ‐ <text:line-break/><text:span text:style-name="T1"> </text:span><text:span text:style-name="T2">(125/24) </text:span> ⲟⲥ ϭⲉ ⲧⲏⲣⲟⲩ ⲟⲩⲱⲛϩ ⲉⲃⲟⲗ ϩⲛ̅ ⲙ̅ⲡⲗⲁⲥ‐ <text:line-break/><text:span text:style-name="T1"> </text:span><text:span text:style-name="T2">(125/25) </text:span> ⲙⲁ ⲛ̅ⲛ̅ⲁⲣⲭⲱⲛ ⲁⲩⲱ ⲛ̅ⲧⲁⲣⲟⲩϭⲱⲗ’ⲡ ⲉ‐ <text:line-break/><text:span text:style-name="T1"> </text:span><text:span text:style-name="T2">(125/26) </text:span> ⲃⲟⲗ ⲛ̅ⲧⲁⲗⲏⲑⲉⲓⲁ ⲉⲙⲛ̅ ⲡⲉ’ⲧⲧⲛ̅ⲧⲱⲛ ⲉ‐ <text:line-break/><text:span text:style-name="T1"> </text:span><text:span text:style-name="T2">(125/27) </text:span> ⲣⲟⲥ ⲁⲩϯ ϣⲓⲡⲉ ⲛ̅ⲥⲟⲫⲓⲁ ⲛⲓⲙ ⲛ̅ⲛ̅ⲛⲟⲩ‐ <text:line-break/><text:span text:style-name="T1"> </text:span><text:span text:style-name="T2">(125/28) </text:span> ⲧⲉ ⲁⲩⲱ ⲧⲟⲩϣⲓⲙⲁⲣⲙⲉⲛⲏ%2 ⲁⲩϩⲉ ⲉⲣⲟⲥ <text:line-break/><text:span text:style-name="T1"> </text:span><text:span text:style-name="T2">(125/29) </text:span> ⲉⲥⲟ ⲛ̅ⲕⲁⲧⲁⲅⲛⲱⲥⲓⲥ ⲁⲩⲱ ⲧⲟⲩⲇⲩⲛⲁⲙⲓⲥ <text:line-break/><text:span text:style-name="T1"> </text:span><text:span text:style-name="T2">(125/30) </text:span> ⲁⲥⲱϣ’ⲙ̅ ⲧⲟⲩⲙⲛ̅ⲧϫⲟⲉⲓⲥ ⲁⲩⲣ̅ⲕⲁⲧⲁⲗⲩⲉ <text:line-break/><text:span text:style-name="T1"> </text:span><text:span text:style-name="T2">(125/31) </text:span> ⲙ̅ⲙ̣[ⲟ]ⲥ ⲧⲟⲩⲡⲣⲟⲛⲟⲓⲁ ⲁⲥϣⲱⲡⲉ ⲁⲩⲡⲉ’ⲧ‐ <text:line-break/><text:span text:style-name="T1"> </text:span><text:span text:style-name="T2">(125/32) </text:span> ϣ[ⲟⲩⲉⲓ’ⲧ ⲙⲛ̅ ⲡ]ⲟⲩⲉⲟⲟⲩ §ϩⲁ ⲧⲉϩⲏ ⲛ̅ⲧⲥⲩⲛ‐ <text:line-break/><text:span text:style-name="T1"> </text:span><text:span text:style-name="T2">(125/33) </text:span> ⲧⲉⲗⲉⲓⲁ̣ [ⲙ̅ⲡⲁⲓⲱ]ⲛ ⲡⲙⲁ ⲧⲏⲣϥ ⲛⲁⲛⲟⲉⲓⲛ <text:line-break/><text:span text:style-name="T1"> </text:span><text:span text:style-name="T2">(125/34) </text:span> ϩⲓⲧⲛ̅ⲛⲟⲩ̣[ⲛ]ⲟ̣ϭ ⲛ̅ϩⲣⲟⲩⲃⲃⲁ[ⲉⲓ] ⲧⲟⲧⲉ ⲛ̣̅ⲁⲣ‐ <text:line-break/><text:span text:style-name="T1"> </text:span><text:span text:style-name="T2">(125/35) </text:span> ⲭⲱⲛ ⲛⲁⲣ̅ⲡⲉⲛⲑⲉⲓ ⲉⲩ[.......ⲡⲟ]’ⲩ <text:line-break/><text:span text:style-name="T1"> </text:span><text:span text:style-name="T2">(126/1) </text:span> ⲙⲟⲩ ⲛ̅ⲁⲅⲅⲉⲗⲟⲥ ⲛⲁⲣ̅ ϩⲏⲃⲉ ⲛ̅ⲛⲟⲩⲣⲱⲙⲉ <text:line-break/><text:span text:style-name="T1"> </text:span><text:span text:style-name="T2">(126/2) </text:span> ⲁⲩⲱ ⲛ̅ⲇⲁⲓⲙⲱⲛ ⲛⲁⲣⲓⲙⲉ ⲛ̅ⲛⲟⲩⲕⲁⲓⲣⲟⲥ <text:line-break/><text:span text:style-name="T1"> </text:span><text:span text:style-name="T2">(126/3) </text:span> ⲁⲩⲱ ⲛⲟⲩⲣⲱⲙⲉ ⲥⲉⲛⲁⲛⲉϩⲡⲉ ⲛ̅ⲥⲉⲁϣ‐ <text:line-break/><text:span text:style-name="T1"> </text:span><text:span text:style-name="T2">(126/4) </text:span> ⲕⲁ’ⲕ ⲉⲃⲟⲗ ⲉϫⲛ̅ ⲡⲟⲩⲙⲟⲩ §ⲧⲟⲧⲉ ⲡⲁⲓⲱⲛ <text:line-break/><text:span text:style-name="T1"> </text:span><text:span text:style-name="T2">(126/5) </text:span> ⲛⲁⲣ̅ⲁⲣⲭⲉⲓ ⲛ̅ⲥⲉϣⲧⲟⲣⲧⲣ̅ ⲛⲉϥⲣ̅ⲣⲱⲟⲩ ⲛⲁ‐ <text:line-break/><text:span text:style-name="T1"> </text:span><text:span text:style-name="T2">(126/6) </text:span> ϯϩⲉ ⲉⲃⲟⲗ ϩⲛ̅ ⲧⲥⲏϥⲉ ⲛ̅ⲥⲁⲧⲉ ⲁⲩⲱ ⲥⲉⲛⲁ‐ <text:line-break/><text:soft-page-break/><text:span text:style-name="T1"> </text:span><text:span text:style-name="T2">(126/7) </text:span> ⲣ̅ ⲡⲟⲗⲉⲙⲟⲥ ⲉϩⲟⲩⲛ ⲉⲛⲟⲩⲉⲣⲏⲩ ϩⲱⲥⲧⲉ <text:line-break/><text:span text:style-name="T1"> </text:span><text:span text:style-name="T2">(126/8) </text:span> ⲛ̅ⲧⲉ ⲡⲕⲁϩ ϯϩⲉ ⲉⲃⲟⲗ ϩⲛ̅ ⲛ̅ⲥⲛ’ⲟϥ ⲉⲧⲡⲟϩ’ⲧ <text:line-break/><text:span text:style-name="T1"> </text:span><text:span text:style-name="T2">(126/9) </text:span> ⲉⲃⲟⲗ ⲁⲩⲱ ⲛ̅ⲑⲁⲗⲁⲥⲥⲁ ⲛⲁϣⲧⲟⲣⲧⲣ̅ ϩⲓⲧⲛ̅ <text:line-break/><text:span text:style-name="T1"> </text:span><text:span text:style-name="T2">(126/10) </text:span> ⲙ̅ⲡⲟⲗⲉⲙⲟⲥ ⲉⲧⲙ̅ⲙⲁⲩ §ⲧⲟⲧⲉ ⲡⲣⲏ ⲛⲁⲣ̅ ⲕⲁ‐ <text:line-break/><text:span text:style-name="T1"> </text:span><text:span text:style-name="T2">(126/11) </text:span> ⲕⲉ ⲁⲩⲱ ⲡⲟⲟϩ ⲛⲁⲧⲁⲕⲟ ⲙ̅ⲡⲉϥⲟⲩⲟⲉⲓⲛ <text:line-break/><text:span text:style-name="T1"> </text:span><text:span text:style-name="T2">(126/12) </text:span> ⲛ̅ⲥⲓⲟⲩ ⲛ̅ⲧⲡⲉ ⲛⲁⲣ̅ⲁⲑⲉⲧⲉⲓ ⲙ̅ⲡⲟⲩⲇⲣⲟⲙⲟⲥ <text:line-break/><text:span text:style-name="T1"> </text:span><text:span text:style-name="T2">(126/13) </text:span> ⲁⲩⲱ ⲟⲩⲛ̅ⲛⲟⲩⲛⲟϭ ⲛ̅ϩⲣⲟⲩⲃⲃⲁⲉⲓ ⲛⲏⲩ ⲉ‐ <text:line-break/><text:span text:style-name="T1"> </text:span><text:span text:style-name="T2">(126/14) </text:span> ⲃⲟⲗ ϩⲛ̅ⲛⲟⲩⲛⲟϭ ⲛ̅ⲇⲩⲛⲁⲙⲓⲥ ⲉⲧⲙ̅ⲡⲥⲁ ⲛ‐ <text:line-break/><text:span text:style-name="T1"> </text:span><text:span text:style-name="T2">(126/15) </text:span> ⲧⲡⲉ ⲛ̅ⲛ̅ⲇⲩⲛⲁⲙⲓⲥ ⲧⲏⲣⲟⲩ ⲙ̅ⲡⲭⲁⲟⲥ ⲡⲙⲁ <text:line-break/><text:span text:style-name="T1"> </text:span><text:span text:style-name="T2">(126/16) </text:span> ⲉⲧⲉ ⲡⲥⲧⲉⲣⲉⲱⲙⲁ ⲙ̅ⲙⲁⲩ ⲛ̅ⲧⲥϩⲓⲙⲉ ⲛ̅ⲧⲁ‐ <text:line-break/><text:span text:style-name="T1"> </text:span><text:span text:style-name="T2">(126/17) </text:span> ⲣⲉ ⲧⲏ ⲧⲁⲙⲓⲟ ⲙ̅ⲡϣⲟⲣ’ⲡ ⲛ̅ⲉⲣⲅⲟⲛ ⲥⲛⲁ‐ <text:line-break/><text:span text:style-name="T1"> </text:span><text:span text:style-name="T2">(126/18) </text:span> ⲕⲱ ⲉϩⲣⲁⲓ̈ ⲙ̅ⲡⲕⲱϩ’ⲧ ⲛ̅ⲥⲁⲃⲉ ⲛ̅ⲧⲉ ⲧⲉⲡⲓ‐ <text:line-break/><text:span text:style-name="T1"> </text:span><text:span text:style-name="T2">(126/19) </text:span> ⲛⲟⲓⲁ ⲥⲛⲁϯ ϩⲓⲱⲱⲥ ⲛ̅ⲟⲩⲟⲣⲅⲏ ⲙ̅ⲙⲛ’ⲧ‐ <text:line-break/><text:span text:style-name="T1"> </text:span><text:span text:style-name="T2">(126/20) </text:span> ⲁⲑⲏⲧ §ⲧⲟⲧⲉ ⲥⲛⲁⲣ̅ⲇⲓⲱⲕⲉ ⲛ̅ⲛ̅ⲛⲟⲩⲧⲉ <text:line-break/><text:span text:style-name="T1"> </text:span><text:span text:style-name="T2">(126/21) </text:span> ⲙ̅ⲡⲭⲟⲁⲥ ⲛⲁⲉⲓ ⲛ̅ⲧⲁⲥⲥⲟⲛⲧⲟⲩ ⲙⲛ̅ ⲡⲁ’ⲣ‐ <text:line-break/><text:span text:style-name="T1"> </text:span><text:span text:style-name="T2">(126/22) </text:span> ⲭⲓⲅⲉⲛⲉⲧⲱ’ⲣ ⲥⲛⲁⲛⲟϫⲟⲩ ⲉⲡⲓⲧⲛ̅ ⲉⲡⲛⲟⲩⲛ <text:line-break/><text:span text:style-name="T1"> </text:span><text:span text:style-name="T2">(126/23) </text:span> ⲥⲉⲛⲁϥⲟⲧⲟⲩ ⲉⲃⲟⲗ ϩⲓⲧⲛ̅ ⲧⲟⲩⲁⲇⲓⲕⲓ’ⲁ ⲥⲉⲛⲁ‐ <text:line-break/><text:span text:style-name="T1"> </text:span><text:span text:style-name="T2">(126/24) </text:span> ϣⲱⲡⲉ ⲅⲁ’ⲣ ⲛ̅ⲑⲉ ⲛ̅ⲛⲓⲧⲟⲟⲩ ⲉⲧϫⲉⲣⲉ ⲕⲱϩ’ⲧ <text:line-break/><text:span text:style-name="T1"> </text:span><text:span text:style-name="T2">(126/25) </text:span> ⲛ̅ⲥⲉⲟⲩⲱⲙ ⲛ̅ⲥⲁ ⲛⲟⲩⲉⲣⲏⲩ ϣⲁⲛⲧⲟⲩⲱϫⲛ̅ <text:line-break/><text:span text:style-name="T1"> </text:span><text:span text:style-name="T2">(126/26) </text:span> ⲉⲃⲟⲗ ϩⲓⲧⲟⲟ’ⲧϥ ⲙ̅ⲡⲟⲩⲁⲣⲭⲓⲅⲉⲛⲉⲧⲱ’ⲣ <text:line-break/><text:span text:style-name="T1"> </text:span><text:span text:style-name="T2">(126/27) </text:span> ϩⲟⲧⲁⲛ ⲉϥϣⲁⲛⲟϫⲛⲟⲩ ϥⲛⲁⲕⲟ’ⲧϥ ⲉⲣ’ⲟϥ <text:line-break/><text:span text:style-name="T1"> </text:span><text:span text:style-name="T2">(126/28) </text:span> ⲟⲩⲁ’ⲁϥ ⲛ̅ϥⲟϫⲛ’ⲉϥ ϣⲁⲛⲧ’ⲉϥⲱϫⲛ̅ §ⲁⲩⲱ <text:line-break/><text:span text:style-name="T1"> </text:span><text:span text:style-name="T2">(126/29) </text:span> ⲛⲟⲩⲙ̅ⲡⲏⲩⲉ ⲛⲁϩⲁⲉⲓⲉ ⲉϫⲛ̅ ⲛⲟⲩⲉⲣⲏⲩ <text:line-break/><text:span text:style-name="T1"> </text:span><text:span text:style-name="T2">(126/30) </text:span> ⲁⲩⲱ ⲛ̅ⲧⲉ ⟦ⲩ⟧ ⲛⲟⲩⲇⲩⲛⲁⲙⲓⲥ ⲣⲟⲕϩ † ⲛ̅ⲟⲩⲕⲉ‐ <text:line-break/><text:span text:style-name="T1"> </text:span><text:span text:style-name="T2">(126/31) </text:span> ⲁⲓⲱⲛ ⲥⲉⲛⲁϣⲟⲣϣⲣ̅ §ⲁⲩⲱ ⲧⲉϥⲡⲉ̣ ⲛⲁ‐ <text:line-break/><text:span text:style-name="T1"> </text:span><text:span text:style-name="T2">(126/32) </text:span> ϩⲁⲉⲓⲉ ⲛ̅ⲥⲣ̅ ⲥⲛⲁⲩ ⲡⲉϥⲕ....ⲛ̅[...] ⲛⲁ‐ <text:line-break/><text:span text:style-name="T1"> </text:span><text:span text:style-name="T2">(126/33) </text:span> ϩⲁⲉⲓⲉ ⲉⲡⲉⲥⲏ’ⲧ ⲉⲡⲕⲁ[........].‐ <text:line-break/><text:span text:style-name="T1"> </text:span><text:span text:style-name="T2">(126/34) </text:span> ϣϥⲓ ϩⲁⲣⲟⲟⲩ ⲥⲛⲁϩⲁⲉ̣[ⲓⲉ ⲉⲡⲓⲧ]ⲛ̣̅ ⲉⲡⲛⲟⲩⲛ <text:line-break/><text:span text:style-name="T1"> </text:span><text:span text:style-name="T2">(126/35) </text:span> ⲁ[ⲩ]ⲱ̣ ⲡⲛ̣[ⲟⲩ]ⲛ ⲛⲁϣⲟⲣ̅ϣⲣ̅ §ⲡⲟ̣ⲩ̣ⲟⲉⲓⲛ ⲛ’ⲁ‐ <text:line-break/><text:span text:style-name="T1"> </text:span><text:span text:style-name="T2">(126/36) </text:span> [.... ⲙ̅ⲡⲕⲁ]ⲕⲉ ⲛ̅ϥϥⲟ’ⲧϥ ⲉⲃⲟⲗ ϥⲁⲣ̅ ⲑⲉ <text:line-break/><text:span text:style-name="T1"> </text:span><text:span text:style-name="T2">(127/1) </text:span> ⲙⲡⲉⲧⲉ ⲙ̅ⲡⲉϥϣⲱⲡⲉ ⲁⲩⲱ ⲡⲉⲣⲅⲟⲛ ⲛ̅ⲧⲁ <text:line-break/><text:span text:style-name="T1"> </text:span><text:span text:style-name="T2">(127/2) </text:span> ⲡⲕⲁⲕⲉ ⲟⲩⲏϩ ⲛ̅ⲥ’ⲱϥ ϥⲛⲁⲃⲱ’ⲗ ⲉⲃⲟ’ⲗ ⲁⲩⲱ <text:line-break/><text:span text:style-name="T1"> </text:span><text:span text:style-name="T2">(127/3) </text:span> ⲡϣⲧⲁ ⲛⲁⲡⲱⲣ’ⲕ ϩⲁ ⲧⲉϥⲛⲟⲩⲛⲉ ⲉⲡⲓⲧⲛ̅ ⲉ‐ <text:line-break/><text:span text:style-name="T1"> </text:span><text:span text:style-name="T2">(127/4) </text:span> ⲡⲕⲁⲕⲉ ⲁⲩⲱ ⲡⲟⲩⲟⲉⲓⲛ ⲛⲁⲣ̅ⲁⲛⲁⲭⲱⲣⲉⲓ ⲉϩ‐ <text:line-break/><text:span text:style-name="T1"> </text:span><text:span text:style-name="T2">(127/5) </text:span> ⲣⲁⲓ̈ ⲉⲧⲉϥⲛⲟⲩⲛⲉ §ⲁⲩⲱ ⲡⲉⲟⲟⲩ ⲙ̅ⲡⲁⲅⲉⲛ‐ <text:line-break/><text:span text:style-name="T1"> </text:span><text:span text:style-name="T2">(127/6) </text:span> ⲛⲏⲧⲟⲥ ⲛⲁⲟⲩⲱⲛϩ ⲉⲃⲟⲗ ⲁⲩⲱ ϥⲛⲁⲙⲟⲩϩ <text:line-break/><text:span text:style-name="T1"> </text:span><text:span text:style-name="T2">(127/7) </text:span> ⲛ̅ⲛⲁⲓⲱⲛ ⲧⲏⲣⲟⲩ ⲉⲣϣⲁ ⲧⲡⲣⲟⲫⲏⲧⲉⲓⲁ ⲙⲛ̅ <text:line-break/><text:span text:style-name="T1"> </text:span><text:span text:style-name="T2">(127/8) </text:span> ϫⲓⲥⲧⲟⲣⲓⲁ ⲛ̅ⲛⲉⲧⲟ ⲛ̅ⲣ̅ⲣⲟ ϭⲱⲗ’ⲡ ⲉⲃⲟⲗ ⲁⲩⲱ <text:line-break/><text:span text:style-name="T1"> </text:span><text:span text:style-name="T2">(127/9) </text:span> ⲛ̅ⲥϫⲱ’ⲕ ⲉⲃⲟⲗ ϩⲓⲧⲛ̅ ⲛⲉⲧⲟⲩⲙⲟⲩⲧⲉ ⲉⲣⲟⲟⲩ <text:line-break/><text:span text:style-name="T1"> </text:span><text:span text:style-name="T2">(127/10) </text:span> ϫⲉ ⲧⲉⲗⲉⲓⲟⲥ ⲛⲉⲧⲉ ⲙ̅ⲡⲟⲩⲣ̅ ⲧⲉⲗⲉⲓⲟⲥ ⲇⲉ <text:line-break/><text:span text:style-name="T1"> </text:span><text:span text:style-name="T2">(127/11) </text:span> ϩⲙ̅ ⲡⲁⲅⲉⲛ〈ⲛ〉ⲏⲧⲟⲥ ⲉⲓⲱ’ⲧ ⲥⲉⲛⲁϫ’ⲓ ⲛ̅ⲛⲟⲩⲉ‐ <text:line-break/><text:span text:style-name="T1"> </text:span><text:span text:style-name="T2">(127/12) </text:span> ⲟⲟⲩ ϩⲛ̅ ⲛⲟⲩⲁⲓⲱⲛ ⲁⲩⲱ ϩⲛ̅ ⲙ̅ⲙⲛⲧⲣ̅ⲣⲟ ⲛ̅‐ <text:line-break/><text:span text:style-name="T1"> </text:span><text:span text:style-name="T2">(127/13) </text:span> ⲛⲁⲧⲙⲟⲩ ⲥⲉⲛⲁⲃⲱ’ⲕ ⲇⲉ ⲁⲛ ⲉⲛⲉϩ ⲉϩⲟⲩⲛ <text:line-break/><text:span text:style-name="T1"> </text:span><text:span text:style-name="T2">(127/14) </text:span> ⲉⲧⲙⲛ̅ⲧⲁⲧⲣ̅ⲣⲟ §ϩⲁⲡⲥ̅ ⲅⲁⲣ ⲉⲧⲣⲉ ⲟⲩⲟⲛ ⲛⲓ’ⲙ <text:line-break/><text:span text:style-name="T1"> </text:span><text:span text:style-name="T2">(127/15) </text:span> ⲃⲱ’ⲕ ⲉⲡⲧⲟⲡⲟⲥ ⲛ̅ⲧⲁϥⲉⲓ ⲉⲃⲟⲗ ⲛ̅ϩⲏⲧϥ̅ ⲡⲟⲩ‐ <text:line-break/><text:span text:style-name="T1"> </text:span><text:span text:style-name="T2">(127/16) </text:span> ⲁ ⲅⲁⲣ ⲡⲟⲩⲁ ⲉⲃⲟⲗ ϩⲛ̅ ⲧⲉϥⲡⲣⲁⲝⲓⲥ ⲙⲛ̅ ⲧⲉϥ‐ <text:line-break/><text:span text:style-name="T1"> </text:span><text:span text:style-name="T2">(127/17) </text:span> ⲅⲛⲱⲥⲓⲥ ⲛⲁϭⲱⲗ’ⲡ ⲉⲃⲟ’ⲗ ⲛ̅ⲧⲉϥⲫⲩⲥⲓⲥ </text:p>
      <text:p text:style-name="P4">( codex II ) The Exegesis on the Soul</text:p>
      <text:p text:style-name="P3"><text:span text:style-name="T1"> </text:span><text:span text:style-name="T2">(127/18) </text:span> ]ⲧⲉⲝⲏⲅⲏⲥⲓⲥ ⲉⲧⲃⲉ ⲧⲯⲩⲭⲏ[ <text:line-break/><text:span text:style-name="T1"> </text:span><text:span text:style-name="T2">(127/19) </text:span> §ⲁⲛⲥⲟⲫⲟⲥ ⲉⲧϣⲟⲟⲡ ϩⲓⲧⲛ̅ⲛⲉϩⲏ ⲁⲩϯ ⲟ‐ <text:line-break/><text:span text:style-name="T1"> </text:span><text:span text:style-name="T2">(127/20) </text:span> ⲛⲟⲙⲁⲥⲓⲁ ⲉⲧⲯⲩⲭⲏ ⲛ̅ⲛⲟⲩⲣⲁⲛ ⲛ̅ⲥϩⲓⲙⲉ <text:line-break/><text:span text:style-name="T1"> </text:span><text:span text:style-name="T2">(127/21) </text:span> ⲟⲛⲧⲱⲥ ⲟⲛ ϩⲛ̅ ⲧⲉⲥⲫⲩⲥⲓⲥ ⲟⲩⲥϩⲓⲙⲉ ⲧⲉ <text:line-break/><text:span text:style-name="T1"> </text:span><text:span text:style-name="T2">(127/22) </text:span> ⲟⲩⲛ̅ⲧⲁⲥ ⲙ̅ⲙⲁⲩ ϩⲱⲱⲥ ⲛ̅ⲧⲉⲥⲙⲏⲧⲣⲁ §ϩⲉⲱⲥ <text:line-break/><text:span text:style-name="T1"> </text:span><text:span text:style-name="T2">(127/23) </text:span> ⲙⲉⲛ ⲉⲥϣⲟⲟⲡ’ ⲟⲩⲁⲁⲧⲥ̅ ϩⲁϩⲧⲙ̅ ⲡⲉⲓⲱⲧ’ <text:line-break/><text:span text:style-name="T1"> </text:span><text:span text:style-name="T2">(127/24) </text:span> ⲟⲩⲡⲁⲣⲑⲉⲛⲟⲥ ⲧⲉ ⲁⲩⲱ ⲟⲩϩⲟⲩⲧⲥϩⲓⲙⲉ ⲧⲉ <text:line-break/><text:span text:style-name="T1"> </text:span><text:span text:style-name="T2">(127/25) </text:span> ϩⲙ̅ ⲡⲉⲥⲉⲓⲛⲉ ϩⲟⲧⲁⲛ ⲇⲉ ⲉⲥϣⲁⲛϩⲁⲉⲓⲉ <text:line-break/><text:span text:style-name="T1"> </text:span><text:span text:style-name="T2">(127/26) </text:span> ⲉⲡⲓⲧⲛ̅ ⲉⲥⲱⲙⲁ ⲛ̅ⲥⲓ ⲉⲡⲉⲉⲓⲃⲓⲟⲥ ⲧⲟⲧⲉ ⲁⲥ‐ <text:line-break/><text:span text:style-name="T1"> </text:span><text:span text:style-name="T2">(127/27) </text:span> ϩⲁⲉⲓⲉ ⲁⲧⲟⲟⲧⲟⲩ ⲛ̅ϩⲁϩ ⲛ̅ⲗⲏⲥⲧⲏⲥ ⲁⲩⲱ ⲛ̅‐ <text:line-break/><text:span text:style-name="T1"> </text:span><text:span text:style-name="T2">(127/28) </text:span> ϩⲩⲃ̣[ⲣⲓ]ⲥⲧⲏⲥ ⲁⲩⲛⲟϫⲥ ⲉⲧⲟⲟⲧⲟⲩ ⲛ̅ⲛⲟⲩⲉⲣⲏⲩ <text:line-break/><text:span text:style-name="T1"> </text:span><text:span text:style-name="T2">(127/29) </text:span> ⲁⲩ̣[.........]ⲟⲥ ϩⲟⲉⲓⲛⲉ ⲙⲉⲛ ⲁⲩⲭⲣⲱ <text:line-break/><text:span text:style-name="T1"> </text:span><text:span text:style-name="T2">(127/30) </text:span> ⲛⲁⲥ̣ ϩ[ⲛ̅ⲛⲟⲩⲃⲓ]ⲁ̣ ϩⲛ̅ⲕⲟⲟⲩⲉ ⲇⲉ ⲉⲩⲡⲉⲓⲑⲉ <text:line-break/><text:span text:style-name="T1"> </text:span><text:span text:style-name="T2">(127/31) </text:span> ⲙ̅ⲙⲟⲥ ϩⲛ̣̅ [ⲟ]ⲩ̣ⲁⲡⲁⲧⲏ ⲛ̅ⲇⲱⲣ̣[ⲟ]ⲛ ϩⲁⲡⲁ̣ⲝ <text:line-break/><text:span text:style-name="T1"> </text:span><text:span text:style-name="T2">(127/32) </text:span> ϩⲁⲡⲗⲱⲥ ⲁⲩϫⲟϩⲙⲥ̅ⲁⲥ̣[.....ⲧⲉⲥⲙⲛ̅]ⲧ̣ <text:line-break/><text:span text:style-name="T1"> </text:span><text:span text:style-name="T2">(128/1) </text:span> ⲡⲁⲣⲑⲉⲛⲟⲥ §ⲁⲩⲱ ⲁⲥⲡⲟⲣⲛⲉⲩⲉ ϩⲙ̅ ⲡⲉⲥ‐ <text:line-break/><text:span text:style-name="T1"> </text:span><text:span text:style-name="T2">(128/2) </text:span> ⲥⲱⲙⲁ ⲁⲩⲱ ⲁⲥⲧⲁⲁⲥ ⲛ̅ⲧⲟⲟⲧϥ’ ⲟⲩⲟⲛ ⲛⲓⲙ’ <text:line-break/><text:span text:style-name="T1"> </text:span><text:span text:style-name="T2">(128/3) </text:span> ⲁⲩⲱ ⲡⲉⲧⲥⲁϭⲟⲗϫⲥ̅ ⲙ̅ⲙⲟϥ’ ⲉⲥⲙⲉⲉⲩⲉ <text:line-break/><text:span text:style-name="T1"> </text:span><text:span text:style-name="T2">(128/4) </text:span> ϫⲉ ⲡⲉⲥϩⲁⲉⲓ ⲡⲉ ϩⲟⲡⲧⲟⲉ ⲛ̅ⲧⲁⲥⲧⲁⲁⲥ ⲛ̅‐ <text:line-break/><text:span text:style-name="T1"> </text:span><text:span text:style-name="T2">(128/5) </text:span> ⲧⲟⲟⲧⲟⲩ ⲛ̅ϩⲛ̅ⲙⲟⲓⲭⲟⲥ ⲛ̅ϩⲩⲃⲣⲓⲥⲧⲏⲥ ⲛ̅ⲁ‐ <text:line-break/><text:span text:style-name="T1"> </text:span><text:span text:style-name="T2">(128/6) </text:span> ⲡⲓⲥⲧⲟⲥ ⲁⲧⲣⲟⲩⲣ̅ⲭⲣⲱ ⲛⲁⲥ ⲧⲟⲧⲉ ⲁⲥⲁϣ ⲉϩⲟⲙ’ <text:line-break/><text:span text:style-name="T1"> </text:span><text:span text:style-name="T2">(128/7) </text:span> ⲉⲙⲁⲧⲉ ⲁⲩⲱ ⲁⲥⲙⲉⲧⲁⲛⲟⲉⲓ ⲡⲁⲗⲓⲛ ⲉⲥϣⲁⲛ‐ <text:line-break/><text:span text:style-name="T1"> </text:span><text:span text:style-name="T2">(128/8) </text:span> ⲕⲧⲉ ⲡⲉⲥϩⲟ ⲉⲃⲟⲗ ⲛ̅ⲛⲉⲉⲓⲙⲟⲓⲭⲟⲥ ϣⲁⲥⲡⲱⲧ <text:line-break/><text:span text:style-name="T1"> </text:span><text:span text:style-name="T2">(128/9) </text:span> ⲉϩⲟⲩⲛ ⲉϩⲛ̅ⲕⲟⲟⲩⲉ ⲛ̅ⲥⲉⲣ̅ⲁⲛⲁⲅⲕⲁⲍⲉ ⲙ̅ⲙⲟⲥ <text:line-break/><text:span text:style-name="T1"> </text:span><text:span text:style-name="T2">(128/10) </text:span> ⲁⲧⲣⲉⲥϣⲱⲡⲉ ⲛⲙ̅ⲙⲁⲩ ⲛ̅ⲥⲣ̅ ϩⲙϩ̅ⲁ̅ⲗ̅ ⲛⲁⲩ’ <text:line-break/><text:span text:style-name="T1"> </text:span><text:span text:style-name="T2">(128/11) </text:span> ⲛ̅ⲑⲉ ⲛ̅ⲛ̅ϫⲟⲉⲓⲥ ϩⲓϫⲛ̅ ⲡⲟⲩⲙⲁ ⲛ̅ⲅⲕⲟⲧⲕ’ <text:line-break/><text:span text:style-name="T1"> </text:span><text:span text:style-name="T2">(128/12) </text:span> ⲉⲃⲟⲗ ⲇⲉ ⲙ̅ⲡϣⲓⲡⲉ ⲟⲩⲕⲉⲧⲓ ⲙⲁⲥⲧⲟⲗⲙⲁ <text:line-break/><text:span text:style-name="T1"> </text:span><text:span text:style-name="T2">(128/13) </text:span> ⲉⲕⲁⲁⲩ ⲛ̅ⲥⲱⲥ ⲛ̅ⲧⲟⲟⲩ ⲇⲉ ϣⲁⲩⲁⲡⲁⲧⲁ ⲙ̅‐ <text:line-break/><text:span text:style-name="T1"> </text:span><text:span text:style-name="T2">(128/14) </text:span> ⲙⲟⲥ ⲛ̅ⲛⲟⲩⲛⲟϭ ⲛ̅ⲭⲣⲟⲛⲟⲥ ⲛ̅ⲑⲉ ⲛ̅ⲛⲓϩⲁ‐ <text:line-break/><text:span text:style-name="T1"> </text:span><text:span text:style-name="T2">(128/15) </text:span> ⲉⲓ ⲉⲧⲛ̅ϩⲟⲧ ⲛ̅ⲣⲙ̅ⲙ̅ⲙⲉ ϩⲱⲥ ⲉϣϫⲉ ⲉⲩⲧⲓⲙⲁ <text:line-break/><text:span text:style-name="T1"> </text:span><text:span text:style-name="T2">(128/16) </text:span> ⲙ̅ⲙⲟⲥ ⲉⲙⲁⲧⲉ ⲁⲩⲱ ⲑϩⲁⲏ ⲛ̅ⲛⲁⲉⲓ ⲧⲏⲣⲟⲩ <text:line-break/><text:span text:style-name="T1"> </text:span><text:span text:style-name="T2">(128/17) </text:span> ϣⲁⲩⲕⲁⲁⲥ ⲛ̅ⲥⲱⲟⲩ ⲛ̅ⲥⲉⲃⲱⲕ §ⲛ̅ⲧⲟⲥ ⲇⲉ ϣⲁ‐ <text:line-break/><text:span text:style-name="T1"> </text:span><text:span text:style-name="T2">(128/18) </text:span> ⲣⲉⲥϣⲱⲡⲉ ⲛ̅ⲭⲏⲣⲁ ⲛ̅ϩⲏⲕⲉ ⲛ̅ⲉⲣⲏⲙⲟⲥ’ <text:line-break/><text:span text:style-name="T1"> </text:span><text:span text:style-name="T2">(128/19) </text:span> ⲉⲙⲛ̅ⲧⲁⲥ ⲃⲟⲏⲑⲉⲓⲁ ⲙ̅ⲙⲁⲩ ⲟⲩⲇⲉ ϣⲁⲩⲙⲁ‐ <text:line-break/><text:span text:style-name="T1"> </text:span><text:span text:style-name="T2">(128/20) </text:span> ⲁϫⲉ ⲙⲛ̅ⲧⲁ⟦ϥ⟧ⲥϥ’ ⲉⲃⲟⲗ ϩⲙ̅ ⲡⲉⲥⲙ̅ⲕⲁϩ ⲙ̅‐ <text:line-break/><text:span text:style-name="T1"> </text:span><text:span text:style-name="T2">(128/21) </text:span> ⲡⲉⲥϭⲛ̅ ϩⲏⲩ ⲅⲁⲣ ⲗ̅ⲗⲁⲁⲩ ⲛ̅ⲧⲟⲟⲧⲟⲩ ⲉⲓ ⲙⲏ‐ <text:line-break/><text:span text:style-name="T1"> </text:span><text:span text:style-name="T2">(128/22) </text:span> ⲧⲓ ⲁⲛϫⲱϩⲙ̅ ⲛ̅ⲧⲁⲩⲧⲁⲁⲩ ⲛⲁⲥ ϩⲙ̅ ⲡⲧⲣⲟⲩⲣ̅‐ <text:line-break/><text:span text:style-name="T1"> </text:span><text:span text:style-name="T2">(128/23) </text:span> ⲕⲟⲓⲛⲱⲛⲉⲓ ⲛⲙ̅ⲙⲁⲥ ⲁⲩⲱ ⲛⲉⲛⲧⲁⲥϫⲡⲟ‐ <text:line-break/><text:span text:style-name="T1"> </text:span><text:span text:style-name="T2">(128/24) </text:span> ⲟⲩ ⲉⲃⲟⲗ ϩⲛ̅ ⲛ̅ⲙⲟⲓⲭⲟⲥ ⲛ̅ⲕⲱⲫⲟⲥ ⲛⲉ ⲁⲩ‐ <text:line-break/><text:span text:style-name="T1"> </text:span><text:span text:style-name="T2">(128/25) </text:span> ⲱ ϩⲛ̅ⲃⲗ̅ⲗⲁⲁⲩ ⲛⲉ ⲁⲩⲱ ⲥⲉⲟ ⲛ̅ⲣⲙ̅ⲛ̅ⲗⲁϫ‐ <text:line-break/><text:span text:style-name="T1"> </text:span><text:span text:style-name="T2">(128/26) </text:span> ⲗⲉϫ’ ⲡⲟⲩϩⲏⲧ’ ⲡⲟϣⲥ̅ §ϩⲟⲧⲁⲛ ⲇⲉ ⲉⲣϣⲁⲛ‐ <text:line-break/><text:span text:style-name="T1"> </text:span><text:span text:style-name="T2">(128/27) </text:span> ⲡⲉⲓⲱⲧ’ ⲉⲧⲙ̅ⲡⲥⲁ ⲛⲧⲡⲉ ϭⲙ̅ ⲡⲉⲥϣⲓⲛⲉ ⲛ̅‐ <text:line-break/><text:span text:style-name="T1"> </text:span><text:span text:style-name="T2">(128/28) </text:span> ϥϭⲱϣⲧ’ ⲉⲡⲓⲧⲛ̅ ⲉϫⲱⲥ ⲛ̅ϥⲛⲁⲩ ⲉⲣⲟⲥ ⲉⲥⲉ‐ <text:line-break/><text:span text:style-name="T1"> </text:span><text:span text:style-name="T2">(128/29) </text:span> ϣ ⲉϩⲟⲙ ⲙⲛ̅ ⲛⲉⲥⲡⲁⲑⲟⲥ ⲙⲛ̅ ⲧⲁⲥⲭⲏⲙⲟ‐ <text:line-break/><text:span text:style-name="T1"> </text:span><text:span text:style-name="T2">(128/30) </text:span> ⲥⲩⲛⲏ ⲁⲩⲱ ⲉⲥⲙⲁⲧⲉⲛⲟⲉⲓ ⲉϫⲛ̅ ⲧⲉⲥⲡⲟⲣ’‐ <text:line-break/><text:span text:style-name="T1"> </text:span><text:span text:style-name="T2">(128/31) </text:span> ⲛⲉⲓⲁ ⲛ̅ⲧⲁⲥⲁⲁⲥ ⲁⲩⲱ ⲛ̅ⲥⲁⲣⲭⲉⲓ ⲛ̅ⲛⲣ̅ⲉ‐ <text:line-break/><text:soft-page-break/><text:span text:style-name="T1"> </text:span><text:span text:style-name="T2">(128/32) </text:span> ⲡⲓⲕⲁⲗⲉⲓ {ⲛ̅ⲣ̅ⲉⲡⲓⲕⲁⲗⲉⲓ} ⲉϩⲣⲁⲓ̈ ⲉⲡ[ⲉϥⲣ]ⲁ̣ⲛ <text:line-break/><text:span text:style-name="T1"> </text:span><text:span text:style-name="T2">(128/33) </text:span> ⲁⲧⲣⲉϥⲣ̅ⲃⲟⲏⲑⲉⲓ ⲛⲁⲥ ⲉ̣[ⲥ.......ⲡ]ⲉⲥ‐ <text:line-break/><text:span text:style-name="T1"> </text:span><text:span text:style-name="T2">(128/34) </text:span> ϩⲏⲧ’ ⲧⲏⲣϥ’ ⲉⲥϫⲱ ⲙ̅ⲙⲟ̣[ⲥ ϫⲉ ⲙⲁ]ⲧ̣ⲟⲩ̣ϫⲟ‐ <text:line-break/><text:span text:style-name="T1"> </text:span><text:span text:style-name="T2">(128/35) </text:span> ⲉⲓ̣ ⲡ̣ⲁⲉⲓⲱ̣ⲧ ϫⲉ ⲉⲓⲥϩⲏⲏⲧⲉ̣ ϯ̣ⲛⲁϯ ⲗⲟⲅⲟⲥ <text:line-break/><text:span text:style-name="T1"> </text:span><text:span text:style-name="T2">(128/36) </text:span> [ⲛⲁⲕ ϫⲉ ⲁϩⲓⲕⲱ] ⲛ̅ⲥⲱⲉⲓ ⲙ̅ⲡⲁⲏⲉⲓ ⲁⲩⲱ’ <text:line-break/><text:span text:style-name="T1"> </text:span><text:span text:style-name="T2">(129/1) </text:span> ⲁϩⲓⲡⲱⲧ’ ⲉⲃⲟⲗ ⲙ̅ⲡⲁⲡⲁⲣ’ⲑⲉⲛⲱⲛ ⲡⲁⲗⲓⲛ <text:line-break/><text:span text:style-name="T1"> </text:span><text:span text:style-name="T2">(129/2) </text:span> ⲧⲕⲧⲟⲉⲓ ϣⲁⲣⲟⲕ ϩⲟⲧⲁⲛ ⲉϥϣⲁⲛⲛⲁⲩ ⲉⲣⲟⲥ <text:line-break/><text:span text:style-name="T1"> </text:span><text:span text:style-name="T2">(129/3) </text:span> ⲉⲥϣⲟⲟⲡ’ ⲙ̅ⲡⲉⲉⲓⲥⲙⲟⲧ’ ⲧⲟⲧⲉ ϥⲛⲁⲣ̅ⲕⲣⲓⲛⲉ <text:line-break/><text:span text:style-name="T1"> </text:span><text:span text:style-name="T2">(129/4) </text:span> ⲁⲁⲥ ⲛ̅ⲁⲝⲓⲟⲥ ⲁⲧⲣⲉϥⲛⲁ ⲛⲁⲥ ϫⲉ ⲛⲁϣⲉ ⲙ̅ⲙⲟⲕϩⲥ <text:line-break/><text:span text:style-name="T1"> </text:span><text:span text:style-name="T2">(129/5) </text:span> ⲛ̅ⲧⲁϩⲓ ⲉϫⲱⲥ ϫⲉ ⲁⲥⲕⲱ ⲙ̅ⲡⲉⲥⲏⲉⲓ ⲛ̅ⲥⲱⲥ §ⲉϫⲛ̅ <text:line-break/><text:span text:style-name="T1"> </text:span><text:span text:style-name="T2">(129/6) </text:span> ⲧⲡⲟⲣⲛⲓⲁ ϭⲉ ⲛ̅ⲧⲯⲩⲭⲏ ϥⲡⲣⲟⲫⲏⲧⲉⲩⲉ ⲛ̅‐ <text:line-break/><text:span text:style-name="T1"> </text:span><text:span text:style-name="T2">(129/7) </text:span> ϩⲁϩ ⲙ̅ⲙⲁ ⲛ̅ϭⲓ ⲡⲉⲡⲛ̅ⲁ̅ ⲉⲧⲟⲩⲁⲁⲃ ⲡⲉϫⲁϥ’ <text:line-break/><text:span text:style-name="T1"> </text:span><text:span text:style-name="T2">(129/8) </text:span> ⲅⲁⲣ ϩⲛ̅ ⲓⲉⲣⲏⲙⲓⲁⲥ ⲡⲉⲡⲣⲟⲫⲏⲧⲏⲥ ϫⲉ §ϩⲟⲧⲁⲛ <text:line-break/><text:span text:style-name="T1"> </text:span><text:span text:style-name="T2">(129/9) </text:span> ⲉⲣϣⲁ ⲡϩⲁⲉⲓ ⲧⲟⲩⲉⲓⲉ ⲧⲉϥϩⲓⲙⲉ §ⲁⲩⲱ ⲛ̅ⲥ‐ <text:line-break/><text:span text:style-name="T1"> </text:span><text:span text:style-name="T2">(129/10) </text:span> ⲃⲟⲕ’ ⲛ̅ⲥϫⲓ ⲕⲉⲟⲩⲁ ⲙⲏ ⲥⲛⲁⲕⲟⲧⲥ̅ §ⲉⲣⲟϥ ϫⲓⲛ <text:line-break/><text:span text:style-name="T1"> </text:span><text:span text:style-name="T2">(129/11) </text:span> ⲧⲉⲛⲟⲩ ⲙⲏ ϩⲛ̅ ⲟⲩϫⲱϩⲙ’ §ⲙ̅ⲡⲉⲥϫⲱϩⲙ’ <text:line-break/><text:span text:style-name="T1"> </text:span><text:span text:style-name="T2">(129/12) </text:span> ⲛ̅ϭⲓ ⲧⲉⲥϩⲓⲙⲉ ⲉⲧⲙ̅ⲙⲁⲩ §ⲁⲩⲱ ⲛ̅ⲧⲟ ⲁⲣⲉⲡⲟⲣ‐ <text:line-break/><text:span text:style-name="T1"> </text:span><text:span text:style-name="T2">(129/13) </text:span> ⲛⲉⲩⲉ ⲙⲛ̅ ϩⲁϩ §ⲛ̅ϣⲱⲥ ⲁⲩⲱ ⲁⲣⲉⲕⲟⲧⲉ ϣⲁ‐ <text:line-break/><text:span text:style-name="T1"> </text:span><text:span text:style-name="T2">(129/14) </text:span> ⲣⲟⲉⲓ ⲡⲉϫⲁϥ’ ⲛ̅ϭⲓ ⲡϫⲟⲉⲓⲥ ϥⲓ ⲛ̅ⲛⲉⲃⲁⲗ’ §ⲉϩ‐ <text:line-break/><text:span text:style-name="T1"> </text:span><text:span text:style-name="T2">(129/15) </text:span> ⲣⲁⲓ̈ ⲉⲡⲥⲟⲟⲩⲧⲛ̅ ⲁⲩⲱ ⲛ̅ⲧⲉⲛⲁⲩ §ϫⲉ ⲛ̅ⲧⲁϩⲉ‐ <text:line-break/><text:span text:style-name="T1"> </text:span><text:span text:style-name="T2">(129/16) </text:span> ⲡⲟⲣⲛⲉⲩⲉ ⲧⲱⲛ §ⲙⲏ ⲛⲉⲣⲉϩⲙⲟⲟⲥ ⲁⲛ ϩⲛ̅ ⲛⲉ‐ <text:line-break/><text:span text:style-name="T1"> </text:span><text:span text:style-name="T2">(129/17) </text:span> ϩⲓⲏ ⲉⲣⲉϫⲱϩⲙ §ⲙ̅ⲡⲕⲁϩ ϩⲛ̅ ⲛⲉⲡⲟⲣⲛⲓⲁ <text:line-break/><text:span text:style-name="T1"> </text:span><text:span text:style-name="T2">(129/18) </text:span> ⲙⲛ̅ ⲛⲉⲕⲁⲕⲓⲁ §ⲁⲩⲱ ⲁⲣⲉϫⲓ ϩⲁϩ ⲛ̅ϣⲱⲥ ⲉⲩ‐ <text:line-break/><text:span text:style-name="T1"> </text:span><text:span text:style-name="T2">(129/19) </text:span> ϫⲣⲟⲡ’ §ⲛⲉ ⲁⲣⲉϣⲱⲡⲉ ⲛ̅ⲁⲧ’ϩϣⲓⲡⲉ ⲙⲛ̅ ⲟⲩ‐ <text:line-break/><text:span text:style-name="T1"> </text:span><text:span text:style-name="T2">(129/20) </text:span> ⲟⲛ §ⲛⲓⲙ’ ⲙ̅ⲡⲉⲙⲟⲩⲧⲉ ⲉϩⲣⲁⲓ̈ ⲉⲣⲟⲉⲓ §ϩⲱⲥ <text:line-break/><text:span text:style-name="T1"> </text:span><text:span text:style-name="T2">(129/21) </text:span> ⲣⲙ̅ⲛ̅ⲏⲉⲓ’ ⲏ ϩⲱⲥ ⲉⲓⲱⲧ’ ⲏ ⲁⲣⲭⲏⲅⲟⲥ §ⲛ̅ⲧⲉ‐ <text:line-break/><text:span text:style-name="T1"> </text:span><text:span text:style-name="T2">(129/22) </text:span> ⲙⲛ̅ⲧ̅ⲡⲁⲣⲑⲉⲛⲟⲥ ⲡⲁⲗⲓⲛ’ ϥⲥⲏϩ ϩⲛ̅ ⲱⲥⲏⲉ <text:line-break/><text:span text:style-name="T1"> </text:span><text:span text:style-name="T2">(129/23) </text:span> ⲡⲉⲡⲣⲟⲫⲏⲧⲏⲥ ϫⲉ §ⲁⲙⲏⲉⲓⲧⲛ̅ ϫⲓ ϩⲁⲡ’ ⲙⲛ <text:line-break/><text:span text:style-name="T1"> </text:span><text:span text:style-name="T2">(129/24) </text:span> ⲧⲉⲧⲙ̅ⲙⲁⲁⲩ §ϫⲉ ⲥⲛⲁϣⲱⲡⲉ ⲛⲁⲉⲓ ⲁⲛ ⲛ̅ϩⲓ‐ <text:line-break/><text:span text:style-name="T1"> </text:span><text:span text:style-name="T2">(129/25) </text:span> ⲙⲉ ⲁⲩⲱ §ⲁⲛⲟⲕ’ ϯⲛⲁϣⲱⲡⲉ ⲛⲁⲥ ⲁⲛ ⲛ̅ϩⲁ‐ <text:line-break/><text:span text:style-name="T1"> </text:span><text:span text:style-name="T2">(129/26) </text:span> ⲉⲓ ϯⲛⲁϥⲓ §ⲛ̅ⲧⲉⲥⲡⲟⲣⲛⲓⲁ ⲙ̅ⲙⲁⲩ ⲙ̅ⲡⲁⲙ̅ⲧⲟ <text:line-break/><text:span text:style-name="T1"> </text:span><text:span text:style-name="T2">(129/27) </text:span> ⲉⲃⲟⲗ §ⲁⲩⲱ ϯⲛⲁϥⲓ ⲛ̅ⲧⲉⲥⲙⲟⲓⲭⲉⲓⲁ ϩⲛ̅ <text:line-break/><text:span text:style-name="T1"> </text:span><text:span text:style-name="T2">(129/28) </text:span> ⲧⲙⲏⲧⲉ §ⲛ̅ⲛⲉⲥⲕⲓⲃⲉ ϯⲛⲁⲕⲁⲁⲥ ⲉⲥⲕⲁⲕⲁ‐ <text:line-break/><text:span text:style-name="T1"> </text:span><text:span text:style-name="T2">(129/29) </text:span> ϩⲏⲩ §ⲛ̅ⲑⲉ ⲙ̅ⲫⲟⲟⲩ ⲛ̅ⲧⲁⲩϫⲡⲟⲥ ⲙ̅ⲙⲟϥ ⲁⲩ‐ <text:line-break/><text:span text:style-name="T1"> </text:span><text:span text:style-name="T2">(129/30) </text:span> ⲱ §ϯ[ⲛ]ⲁ̣ⲁⲥ ⲛ̅ⲉⲣ̣ⲏⲙⲟⲥ ⲛ̅ⲑⲉ ⲛ̅ⲟⲩⲕⲁϩ §ⲉⲙⲛ̅ <text:line-break/><text:span text:style-name="T1"> </text:span><text:span text:style-name="T2">(129/31) </text:span> ⲙ[ⲟⲟⲩ ⲛ̅ϩⲏⲧϥ ⲁ]ⲩⲱ ϯⲛⲁⲁⲥ §ⲛ̅ⲁⲧϣⲏⲣⲉ <text:line-break/><text:span text:style-name="T1"> </text:span><text:span text:style-name="T2">(129/32) </text:span> ϩⲛ̣̅ⲛⲟ̣[ⲩⲉⲓⲃⲉ ϯ]ⲛⲁⲛⲁ §ⲁⲛ ⲛ̅ⲛⲉⲥϣⲏⲣⲉ ϫⲉ <text:line-break/><text:span text:style-name="T1"> </text:span><text:span text:style-name="T2">(129/33) </text:span> ϩⲛ̅ϣⲏⲣⲉ̣ §[ⲛ]ⲉ̣ ⲙ̣̅ⲡⲟⲣⲛⲉⲓⲁ ϫⲉ ⲁ̣ⲧ̣ⲟⲩⲙⲁ̣ⲁⲩ <text:line-break/><text:span text:style-name="T1"> </text:span><text:span text:style-name="T2">(129/34) </text:span> §ⲣ̅ⲡⲟⲣⲛⲉⲩⲉ ⲁⲩⲱ ⲁⲥϯ ϣ̣[ⲓⲡⲉ §ⲛ̅ⲛⲉⲥϣ]ⲏ̣ⲣ̣[ⲉ] <text:line-break/><text:span text:style-name="T1"> </text:span><text:span text:style-name="T2">(130/1) </text:span> ϫⲉ † ⲁⲥϫⲟⲟϥ §ϫⲉ ϯⲛⲁⲡⲟⲣⲛⲉⲩⲉ ⲙⲛ̅ ⲛⲉⲧ’‐ <text:line-break/><text:span text:style-name="T1"> </text:span><text:span text:style-name="T2">(130/2) </text:span> ⲙⲉ §ⲙ̅ⲙⲟⲉⲓ ⲛⲉⲧⲙ̅ⲙⲁⲩ ⲛⲉⲩϯ ⲛⲁⲉⲓ ⲙ̅ⲡⲁ‐ <text:line-break/><text:span text:style-name="T1"> </text:span><text:span text:style-name="T2">(130/3) </text:span> ⲟⲉⲓⲕ’ §ⲙⲛ̅ ⲡⲁⲙⲟⲟⲩ ⲙⲛ̅ ⲛⲁϣⲧⲏⲛ’ ⲙⲛ̅ ⲛⲁ‐ <text:line-break/><text:span text:style-name="T1"> </text:span><text:span text:style-name="T2">(130/4) </text:span> ϩⲃⲟⲟⲥ §ⲙⲛ̅ ⲡⲁⲏⲣⲡ’ ⲙⲛ̅ ⲡⲁⲛⲏϩ ⲙⲛ̅ ϩⲱⲃ’ <text:line-break/><text:span text:style-name="T1"> </text:span><text:span text:style-name="T2">(130/5) </text:span> ⲛⲓⲙ §ⲉⲧⲣ̅ ϣⲁⲩ ⲛⲁⲉⲓ ⲇⲓⲁ ⲧⲟⲩⲧⲟ ⲉⲓⲥ§ϩⲏⲏⲧⲉ <text:line-break/><text:span text:style-name="T1"> </text:span><text:span text:style-name="T2">(130/6) </text:span> ⲁⲛⲟⲕ’ ϯⲛⲁϣⲧⲁⲙ ⲙ̅ⲙⲟⲟⲩ ϫⲉ §ⲛⲉⲥϣϭⲙ̅ <text:line-break/><text:span text:style-name="T1"> </text:span><text:span text:style-name="T2">(130/7) </text:span> ϭⲟⲙ’ ⲙ̅ⲡⲱⲧ’ ⲛ̅ⲥⲁ ⲛⲉⲥⲛⲟⲉⲓⲕ’ §ⲁⲩⲱ ⲉⲥϣⲁ‐ <text:line-break/><text:span text:style-name="T1"> </text:span><text:span text:style-name="T2">(130/8) </text:span> ϣⲓⲛⲉ ⲛ̅ⲥⲱⲟⲩ ⲛ̅ⲥⲧⲙ̅ϭⲛ̅ⲧⲟⲩ §ⲥⲛⲁϫⲟⲟⲥ <text:line-break/><text:soft-page-break/><text:span text:style-name="T1"> </text:span><text:span text:style-name="T2">(130/9) </text:span> ϫⲉ ϯⲛⲁⲕⲟⲧ’ ⲉⲡⲁϩⲁⲉⲓ §ϫⲓⲛ ϣⲟⲣⲡ’ ϫⲉ ⲛⲉ‐ <text:line-break/><text:span text:style-name="T1"> </text:span><text:span text:style-name="T2">(130/10) </text:span> ⲉⲓⲣ̅ ϣⲁⲩ ⲛ̅ⲛ̅ϩⲟⲟⲩ §ⲉⲧⲙ̅ⲙⲁⲩ ⲛ̅ϩⲟⲩⲟ ⲁⲧⲉ‐ <text:line-break/><text:span text:style-name="T1"> </text:span><text:span text:style-name="T2">(130/11) </text:span> ⲛⲟⲩ ⲡⲁⲗⲓⲛ ⲡⲉϫⲁϥ’ ϩⲛ̅ ⲉϩⲉⲕⲓⲏⲗ ϫⲉ §ⲁⲥ‐ <text:line-break/><text:span text:style-name="T1"> </text:span><text:span text:style-name="T2">(130/12) </text:span> ϣⲱⲡⲉ ⲙⲛ̅ⲛ̅ⲥⲁ ϩⲁϩ ⲛ̅ⲕⲁⲕⲓⲁ’ ⲡⲉϫⲁϥ §ⲛ̅ϭⲓ <text:line-break/><text:span text:style-name="T1"> </text:span><text:span text:style-name="T2">(130/13) </text:span> ⲡϫⲟⲉⲓⲥ ϫⲉ ⲁⲣⲉⲕⲱⲧ ⲛⲉ §ⲛ̅ⲟⲩⲡⲟⲣⲛⲓⲟⲛ <text:line-break/><text:span text:style-name="T1"> </text:span><text:span text:style-name="T2">(130/14) </text:span> ⲁⲩⲱ ⲁⲣⲉⲧⲁⲙⲉⲓⲟ ⲛⲉ §ⲛ̅ⲟⲩⲧⲟⲡⲟⲥ ⲛ̅ⲥⲁⲉⲓ‐ <text:line-break/><text:span text:style-name="T1"> </text:span><text:span text:style-name="T2">(130/15) </text:span> ⲉ ϩⲛ̅ ⲛ̅ⲡⲗⲁⲧⲉⲁ’ §ⲁⲩⲱ ⲁⲣⲉⲕⲱⲧ’ ⲛⲉ ⲛ̅ϩⲛ̅‐ <text:line-break/><text:span text:style-name="T1"> </text:span><text:span text:style-name="T2">(130/16) </text:span> ⲡⲟⲣⲛⲓⲟⲛ ϩⲓ ϩⲓⲏ §ⲛⲓⲙ ⲁⲩⲱ ⲁⲣⲉⲧⲉⲕⲟ ⲛ̅‐ <text:line-break/><text:span text:style-name="T1"> </text:span><text:span text:style-name="T2">(130/17) </text:span> ⲧⲉⲙ̅ⲛ̅ⲧ̅ⲥⲁⲉⲓⲉ §ⲁⲩⲱ ⲁⲣⲉⲥⲱⲧ’ ⲛ̅ⲛⲉⲩⲉⲣⲏⲧⲉ <text:line-break/><text:span text:style-name="T1"> </text:span><text:span text:style-name="T2">(130/18) </text:span> ⲉⲃⲟⲗ ⲉϫⲛ̅ §ϩⲓⲏ ⲛⲓⲙ’ ⲁⲩⲱ ⲁⲣⲉⲧⲁϣⲟ ⲛ̅ⲧⲉⲡⲟⲣ‐ <text:line-break/><text:span text:style-name="T1"> </text:span><text:span text:style-name="T2">(130/19) </text:span> ⲛⲓⲁ §ⲁⲣⲉⲡⲟⲣⲛⲉⲩⲉ ⲙⲛ̅ ⲛ̅ϣⲏⲣⲉ ⲛ̅ⲕⲏⲙⲉ <text:line-break/><text:span text:style-name="T1"> </text:span><text:span text:style-name="T2">(130/20) </text:span> ⲛⲁⲉⲓ §ⲉⲧⲟ ⲛ̅ⲧⲉϣⲉ ⲛⲁ ⲛⲁ ⲛⲓⲛⲟϭ ⲛ̅ⲥⲁⲣⲝ’ ⲛⲓⲙ <text:line-break/><text:span text:style-name="T1"> </text:span><text:span text:style-name="T2">(130/21) </text:span> ⲇⲉ ⲛⲉ ⲛ̅ϣⲏⲣⲉ ⲛ̅ⲕⲏⲙⲉ ⲛⲁ ⲛⲓⲛⲟϭ ⲛ̅ⲥⲁⲣⲝ <text:line-break/><text:span text:style-name="T1"> </text:span><text:span text:style-name="T2">(130/22) </text:span> ⲉⲓ ⲙⲏⲧⲓ ⲁⲛⲥⲁⲣⲕⲓⲕⲟⲛ ⲁⲩⲱ ⲛ̅ⲁⲓⲥⲑⲏⲧⲟⲛ <text:line-break/><text:span text:style-name="T1"> </text:span><text:span text:style-name="T2">(130/23) </text:span> ⲙⲛ̅ ⲛ̅ϩⲃⲏⲩⲉ ⲙ̅ⲡⲕⲁϩ ⲛⲁⲉⲓ ⲛ̅ⲧⲁ ⲧⲯⲩⲭⲏ <text:line-break/><text:span text:style-name="T1"> </text:span><text:span text:style-name="T2">(130/24) </text:span> ϫⲱϩⲙ̅ ⲛ̅ϩⲏⲧⲟⲩ ⲛ̅ⲛⲉⲉⲓⲙⲁ ⲉⲥϫⲓ ⲟⲉⲓⲕ’ ⲛ̅‐ <text:line-break/><text:span text:style-name="T1"> </text:span><text:span text:style-name="T2">(130/25) </text:span> ⲧⲟⲟⲧⲟⲩ ⲉⲥϫⲓ ⲏⲣⲡ’ ⲉⲥϫⲓ ⲛⲉϩ ⲉⲥϫⲓ ϩⲃⲟ‐ <text:line-break/><text:span text:style-name="T1"> </text:span><text:span text:style-name="T2">(130/26) </text:span> ⲟⲥ ⲁⲩⲱ ⲧⲕⲉⲫⲗⲟⲓⲁⲣⲓⲁ ⲉⲧⲙ̅ⲡⲥⲁ ⲛⲃⲟⲗ <text:line-break/><text:span text:style-name="T1"> </text:span><text:span text:style-name="T2">(130/27) </text:span> ⲙ̅ⲡⲕⲱⲧⲉ ⲙ̅ⲡⲥⲱⲙⲁ ⲛⲁⲉⲓ ⲉⲧⲥⲙⲉⲉⲩⲉ <text:line-break/><text:span text:style-name="T1"> </text:span><text:span text:style-name="T2">(130/28) </text:span> ϫⲉⲥⲉⲣ̅ ϣⲁⲩ ⲛⲁⲥ §ⲧⲉⲉⲓⲡⲟⲣⲛⲓⲁ ⲇⲉ ⲁⲛⲁ‐ <text:line-break/><text:span text:style-name="T1"> </text:span><text:span text:style-name="T2">(130/29) </text:span> ⲡⲟⲥⲧⲟⲗⲟⲥ ⲙ̅ⲡⲥⲱⲧⲏⲣ ⲡⲁⲣⲁⲅ’ⲅⲉⲓⲗⲉ ϫⲉ <text:line-break/><text:span text:style-name="T1"> </text:span><text:span text:style-name="T2">(130/30) </text:span> §ⲁⲣⲉϩ ⲉⲣⲱⲧⲛ̅ ⲉⲣⲟⲥ ⲧⲟⲩⲃⲉ ⲧⲏⲩⲧⲛ̅ §ⲉⲣⲟⲥ <text:line-break/><text:span text:style-name="T1"> </text:span><text:span text:style-name="T2">(130/31) </text:span> ⲉⲩϣⲁϫⲉ ⲉⲧⲡⲟⲣⲛⲓⲁ ⲟⲩⲁⲁⲧⲥ ⲁⲛ ⲙ̅ⲡⲥⲱ‐ <text:line-break/><text:span text:style-name="T1"> </text:span><text:span text:style-name="T2">(130/32) </text:span> ⲙⲁ ⲁⲗⲗⲁ ⲧⲁ ⲧ’ⲯⲩⲭⲏ ⲛ̅ϩ̣ⲟ̣ⲩⲟ̣ ⲉⲧ[ⲃⲉ ⲡ]ⲁ̣ⲉⲓ <text:line-break/><text:span text:style-name="T1"> </text:span><text:span text:style-name="T2">(130/33) </text:span> ⲛ̅ⲁⲡⲟⲥⲧⲟⲗⲟⲥ ⲉⲩⲥϩ[ⲁⲓ̈ ⲛ̅ⲛ̅ⲉⲕⲕⲗⲏⲥⲓⲁ] ⲙ̅‐ <text:line-break/><text:span text:style-name="T1"> </text:span><text:span text:style-name="T2">(130/34) </text:span> ⲡⲛⲟⲩⲧⲉ ϣⲓⲛⲁ ϫⲉ ⲛⲉ̣[ⲩⲡⲟⲣⲛⲓ]ⲁ̣’ ⲛ̣̅ⲧ̣ⲉⲉⲓ‐ <text:line-break/><text:span text:style-name="T1"> </text:span><text:span text:style-name="T2">(130/35) </text:span> ⲙ[ⲓ]ⲛⲉ ϣ̣ⲱ̣ⲡⲉ ϩⲣⲁⲓ̈ ⲛ̅ϩⲏⲧ[ⲛ̅] §ⲁ̣ⲗⲗⲁ ⲡⲛⲟϭ <text:line-break/><text:span text:style-name="T1"> </text:span><text:span text:style-name="T2">(130/36) </text:span> [ⲛ̅ⲁⲅⲱⲛ ⲉϥϣ]ⲟⲟⲡ’ ⲉⲧⲃⲉ ⲧⲡⲟⲣⲛⲓⲁ’ <text:line-break/><text:span text:style-name="T1"> </text:span><text:span text:style-name="T2">(131/1) </text:span> ⲛ̅ⲧⲯⲩⲭⲏ ⲉⲃⲟⲗ ⲛ̅ϩⲏⲧⲥ̅ ϣⲁⲣⲉ ⲧⲡⲟⲣⲛⲓⲁ ⲙ̅‐ <text:line-break/><text:span text:style-name="T1"> </text:span><text:span text:style-name="T2">(131/2) </text:span> ⲡⲕⲉⲥⲱⲙⲁ ϣⲱⲡⲉ ⲇⲓⲁ ⲧⲟⲩⲧⲟ ⲡⲁⲩⲗⲟⲥ ⲉϥ‐ <text:line-break/><text:span text:style-name="T1"> </text:span><text:span text:style-name="T2">(131/3) </text:span> ⲥϩⲁⲓ̈ ⲛ̅ⲅⲕⲟⲣⲓⲑⲓⲟⲥ ⲡⲉϫⲁϥ ϫⲉ §ⲁⲉⲓⲥϩⲁⲓ̈ ⲛⲏ‐ <text:line-break/><text:span text:style-name="T1"> </text:span><text:span text:style-name="T2">(131/4) </text:span> ⲧⲛ̅ ϩⲛ̅ ⲧⲉⲡⲓⲥⲧⲟⲗⲏ §ϫⲉ ⲙ̅ⲡⲣ̅ⲧⲱϩ ⲙⲛ̅ ⲡⲟⲣ‐ <text:line-break/><text:span text:style-name="T1"> </text:span><text:span text:style-name="T2">(131/5) </text:span> ⲛⲟⲥ ⲟⲩ §ⲡⲁⲛⲧⲱⲥ ⲙ̅ⲡⲣ̅ⲛⲟⲥ ⲙ̅ⲡⲉⲉⲓⲕⲟⲥ‐ <text:line-break/><text:span text:style-name="T1"> </text:span><text:span text:style-name="T2">(131/6) </text:span> ⲙⲟⲥ ⲏ §ⲡⲗⲉⲟⲛϩⲉⲕⲧⲏⲥ ⲏ ⲛ̅ⲣⲉϥⲧⲱⲣⲡ’ ⲏ §ⲛ̅‐ <text:line-break/><text:span text:style-name="T1"> </text:span><text:span text:style-name="T2">(131/7) </text:span> ⲣⲉϥϣⲙ̅ϣⲉ ⲉⲓⲇⲱⲗⲟⲛ ⲉⲡⲉⲓ ⲁⲣⲁ §ⲧⲉⲧⲛ̅ⲏⲡ’ <text:line-break/><text:span text:style-name="T1"> </text:span><text:span text:style-name="T2">(131/8) </text:span> ⲉⲉⲓ ⲉⲃⲟⲗ ϩⲙ̅ ⲡⲕⲟⲥⲙⲟⲥ ⲧⲁⲉⲓ ⲧⲉ ⲑⲉ ⲉϥ’ϣⲁ‐ <text:line-break/><text:span text:style-name="T1"> </text:span><text:span text:style-name="T2">(131/9) </text:span> ϫⲉ ⲡⲛⲉⲩⲙⲁⲧⲓⲕⲱⲥ §ϫⲉ ⲉⲡⲛ̅ⲁⲅⲱⲛ ϣⲟⲟⲡ’ <text:line-break/><text:span text:style-name="T1"> </text:span><text:span text:style-name="T2">(131/10) </text:span> ⲛⲁⲛ ⲁⲛ’ ⲟⲩⲃⲉ §ⲥⲁⲣⲝ’ ϩⲓ ⲥⲛⲟϥ’ ⲕⲁⲧⲁ ⲑⲉ ⲉⲛ‐ <text:line-break/><text:span text:style-name="T1"> </text:span><text:span text:style-name="T2">(131/11) </text:span> ⲧⲁϥϫⲟⲟⲥ §ⲁⲗⲗⲁ ⲟⲩⲃⲉ ⲛ̅ⲕⲟⲥⲙⲟⲕⲣⲁⲧⲱⲣ’ <text:line-break/><text:span text:style-name="T1"> </text:span><text:span text:style-name="T2">(131/12) </text:span> ⲙ̅ⲡⲉⲉⲓⲕⲁⲕⲉ ⲙⲛ̅ ⲙ̅ⲛⲉⲩⲙⲁⲧⲓⲕⲟⲛ’ ⲛ̅ⲧⲡⲟ‐ <text:line-break/><text:span text:style-name="T1"> </text:span><text:span text:style-name="T2">(131/13) </text:span> ⲛⲏⲣⲓⲁ §ϣⲁ ϩⲟⲩⲛ ⲙⲉⲛ ⲉⲫⲟⲟⲩ ⲉⲧⲯⲩⲭⲏ’ <text:line-break/><text:span text:style-name="T1"> </text:span><text:span text:style-name="T2">(131/14) </text:span> ⲡⲏⲧ’ ⲛ̅ⲥⲁ ⲉⲥⲁ ⲉⲥⲕⲟⲓⲛⲱⲛⲓ ⲙⲛ̅ ⲡⲉⲧⲥⲛⲁ‐ <text:line-break/><text:span text:style-name="T1"> </text:span><text:span text:style-name="T2">(131/15) </text:span> ⲧⲱⲙⲧ’ ⲉⲣⲟϥ’ ⲉⲥϫⲱϩⲙ’ ⲥϣⲟⲟⲡ’ ϩⲁ ⲡⲁⲥ‐ <text:line-break/><text:span text:style-name="T1"> </text:span><text:span text:style-name="T2">(131/16) </text:span> ⲭⲁ ⲛ̅ⲛⲉⲧⲥⲙ̅ⲡϣⲁ ⲉⲧⲣⲉⲥϫⲓⲧⲟⲩ ϩⲟⲧⲁⲛ ⲇⲉ <text:line-break/><text:span text:style-name="T1"> </text:span><text:span text:style-name="T2">(131/17) </text:span> ⲉⲥϣⲁⲣ̅ⲁⲓⲥⲑⲁⲛⲉ ⲛ̅ⲙ̅ⲙⲟⲕϩⲥ̅ ⲉⲧⲥⲛ̅ϩⲏⲧⲟⲩ <text:line-break/><text:span text:style-name="T1"> </text:span><text:span text:style-name="T2">(131/18) </text:span> ⲁⲩⲱ ⲛ̅ⲥⲣⲓⲙⲉ ⲉϩⲣⲁⲓ̈ ⲉⲡⲉⲓⲱⲧ ⲛ̅ⲥⲙⲉⲧⲁⲛⲟ‐ <text:line-break/><text:span text:style-name="T1"> </text:span><text:span text:style-name="T2">(131/19) </text:span> ⲉⲓ ⲧⲟⲧⲉ ϥⲛⲁⲛⲁ ⲛⲁⲥ ⲛ̅ϭⲓ ⲡⲉⲓⲱⲧ ⲛ̣̅ϥⲕⲧⲟ <text:line-break/><text:soft-page-break/><text:span text:style-name="T1"> </text:span><text:span text:style-name="T2">(131/20) </text:span> ⲛ̅ⲧⲉⲥⲙⲏⲧⲣⲁ ⲉⲃⲟⲗ ϩⲛ̅ ⲛⲁ ⲡⲥⲁ ⲛⲃⲟⲗ ⲡⲁⲗⲓⲛ <text:line-break/><text:span text:style-name="T1"> </text:span><text:span text:style-name="T2">(131/21) </text:span> ⲛ̅ϥⲕⲧⲟⲥ ⲉϩⲟⲩⲛ ⲛ̅ⲧⲉ ⲧⲯⲩⲭⲏ ϫⲓ ⲙ̅ⲡⲉⲥ‐ <text:line-break/><text:span text:style-name="T1"> </text:span><text:span text:style-name="T2">(131/22) </text:span> ⲙⲉⲣⲓⲕⲟⲛ † ⲉⲩϣⲟⲟⲡ ⲅⲁⲣ ⲁⲛ ⲛ̅ⲑⲉ ⲛ̅ⲛⲉϩⲓ‐ <text:line-break/><text:span text:style-name="T1"> </text:span><text:span text:style-name="T2">(131/23) </text:span> ⲟⲙⲉ ⲙ̅ⲙⲏⲧⲣⲁ ⲅⲁⲣ ⲙ̅ⲡⲥⲱⲙⲁ ⲉⲩϣⲟⲟⲡ’ <text:line-break/><text:span text:style-name="T1"> </text:span><text:span text:style-name="T2">(131/24) </text:span> ⲙ̅ⲫⲟⲩⲛ’ ⲙ̅ⲡⲥⲱⲙⲁ ⲛ̅ⲑⲉ ⲛⲅⲕⲉⲙⲁϩⲧ ⲧⲙⲏ‐ <text:line-break/><text:span text:style-name="T1"> </text:span><text:span text:style-name="T2">(131/25) </text:span> ⲧⲣⲁ ⲛ̅ⲧⲟϥ’ ⲛ̅ⲧⲯⲩⲭⲏ ⲉⲥⲕⲱⲧⲉ ⲙ̅ⲡⲥⲁ ⲛⲃⲟⲗ <text:line-break/><text:span text:style-name="T1"> </text:span><text:span text:style-name="T2">(131/26) </text:span> ⲛ̅ⲑⲉ ⲛⲙ̅ⲫⲩⲥⲓⲕⲟⲛ ⲙ̅ⲫⲟⲟⲩⲧ’ ⲉⲩϣⲟⲟⲡ’ <text:line-break/><text:span text:style-name="T1"> </text:span><text:span text:style-name="T2">(131/27) </text:span> ⲙ̅ⲡⲃⲟⲗ’ §ⲉⲣϣⲁ ⲧⲙⲏⲧⲣⲁ ϭⲉ ⲛ̅ⲧⲯⲩⲭⲏ’ <text:line-break/><text:span text:style-name="T1"> </text:span><text:span text:style-name="T2">(131/28) </text:span> ⲧⲕⲧⲟⲥ ϩⲙ̅ ⲡⲟⲩⲱϣ ⲙ̅ⲡⲉⲓⲱⲧ’ ⲉⲡⲥⲁ ⲛ‐ <text:line-break/><text:span text:style-name="T1"> </text:span><text:span text:style-name="T2">(131/29) </text:span> ϩⲟⲩⲛ ϣⲁⲣⲉⲥⲣ̅ⲃⲁⲡⲧⲓⲍⲉ ⲁⲩⲱ ⲛ̅ⲧⲟⲩ‐ <text:line-break/><text:span text:style-name="T1"> </text:span><text:span text:style-name="T2">(131/30) </text:span> ⲛⲟⲩ ϣⲁⲥⲧⲟⲩⲃⲟ ⲉⲡϫⲱϩⲙ̅ ⲙ̅ⲡⲥⲁ ⲛ‐ <text:line-break/><text:span text:style-name="T1"> </text:span><text:span text:style-name="T2">(131/31) </text:span> ⲃⲟ̣[ⲗ] ⲡⲁⲉⲓ ⲉⲛⲧⲁⲩⲁⲃϥ’ ⲉϫⲱⲥ ⲛ̅ⲑⲉ ⲛ̅ⲛⲓ‐ <text:line-break/><text:span text:style-name="T1"> </text:span><text:span text:style-name="T2">(131/32) </text:span> ϣ̣[ⲧⲏⲛ ⲉⲩ]ϣ̣ⲁ̣[ⲗ]ⲱⲱⲙ’ ϣⲁⲩⲧⲉⲗⲟⲟⲩ’ ⲉ‐ <text:line-break/><text:span text:style-name="T1"> </text:span><text:span text:style-name="T2">(131/33) </text:span> ⲡ[ⲙⲟⲟⲩ ⲁⲩⲱ ⲛ̅ⲥ]ⲉⲧⲕⲧⲟⲟⲩ ϣⲁⲛⲧⲟⲩⲛ̅ ⲧⲟⲩ‐ <text:line-break/><text:span text:style-name="T1"> </text:span><text:span text:style-name="T2">(131/34) </text:span> ⲗⲁⲁⲙ[ⲉ ⲉⲃⲟⲗ] ⲁⲩⲱ ⲛ̅ⲥⲉⲧⲟⲩⲃⲟ ⲡⲧⲟⲩⲃⲟ <text:line-break/><text:span text:style-name="T1"> </text:span><text:span text:style-name="T2">(131/35) </text:span> ⲇⲉ ⲛ̅ⲧⲯⲩⲭⲏ ⲡⲉ ϫⲓ ⲧⲉⲥⲙⲛⲧ̣[ⲃ]ⲣ̣̅[ⲣ]ⲉ ⲟ̣ⲛ’ <text:line-break/><text:span text:style-name="T1"> </text:span><text:span text:style-name="T2">(132/1) </text:span> ⲙ̅ⲡⲉⲥⲫⲩⲥⲓⲕⲟⲛ ⲛ̅ϣⲟⲣⲡ’ ⲛ̅ⲥⲕⲧⲟⲥ ⲛ̅ⲕⲉ‐ <text:line-break/><text:span text:style-name="T1"> </text:span><text:span text:style-name="T2">(132/2) </text:span> ⲥⲟⲡ’ ⲡⲁⲉⲓ ⲡⲉ ⲡⲉⲥⲃⲁⲡⲧⲓⲥⲙⲁ §ⲧⲟⲧⲉ ⲥⲛⲁ‐ <text:line-break/><text:span text:style-name="T1"> </text:span><text:span text:style-name="T2">(132/3) </text:span> ⲣ̅ⲁⲣⲭⲉⲓ ⲛ̅ⲃⲱⲗⲕ’ ⲉⲣⲟⲥ ⲟⲩⲁⲁⲧⲥ̅ ⲛ̅ⲑⲉ ⲛ̅ⲛⲉⲧ‐ <text:line-break/><text:span text:style-name="T1"> </text:span><text:span text:style-name="T2">(132/4) </text:span> ϣⲁⲩⲙⲓⲥⲉ ⲛ̅ⲧⲉⲩⲛⲟⲩ ⲉⲩϣⲁϫⲡⲉ ⲡϣⲏⲣⲉ <text:line-break/><text:span text:style-name="T1"> </text:span><text:span text:style-name="T2">(132/5) </text:span> ϣⲁⲩⲕⲟⲧⲟⲩ ⲉⲣⲟⲟⲩ ⲟⲩⲁⲁⲩ ϩⲛ̅ⲛⲟⲩⲃⲗⲕⲉ <text:line-break/><text:span text:style-name="T1"> </text:span><text:span text:style-name="T2">(132/6) </text:span> ⲁⲗⲗⲁ ⲉⲡⲉⲓ ⲟⲩⲥϩⲓⲙⲉ ⲧⲉ ⲙⲛ̅ ϭⲟⲙ’ ⲁⲧⲣⲉⲥϫⲡⲉ <text:line-break/><text:span text:style-name="T1"> </text:span><text:span text:style-name="T2">(132/7) </text:span> ϣⲏⲣⲉ ⲟⲩⲁⲁⲧⲥ̅ ⲁⲡⲉⲓⲱⲧ’ ⲧⲛ̅ⲛⲁⲩ ⲛⲁⲥ ⲉⲃⲟⲗ <text:line-break/><text:span text:style-name="T1"> </text:span><text:span text:style-name="T2">(132/8) </text:span> ϩⲛ̅ ⲧⲡⲉ ⲙ̅ⲡⲉⲥϩⲟⲟⲩⲧ’ ⲉⲧⲉ ⲡⲉⲥⲥⲟⲛ ⲡⲉ’ <text:line-break/><text:span text:style-name="T1"> </text:span><text:span text:style-name="T2">(132/9) </text:span> ⲡϣⲟⲣⲡ’ ⲙ̅ⲙⲓⲥⲉ ⲧⲟⲧⲉ ⲁⲡⲣⲙ̅ϣⲉⲗⲉⲉⲧ’ ⲉⲓ <text:line-break/><text:span text:style-name="T1"> </text:span><text:span text:style-name="T2">(132/10) </text:span> ⲁⲡⲓⲧⲛ̅ ϣⲁ ϫⲉⲗⲉⲉⲧ’ ⲁⲥⲕⲱ ⲙⲉⲛ ⲛ̅ⲥⲱⲥ ⲛ̅‐ <text:line-break/><text:span text:style-name="T1"> </text:span><text:span text:style-name="T2">(132/11) </text:span> ⲧⲉⲥⲡⲟⲣⲛⲓⲁ ⲛ̅ϣⲟⲣⲡ’ ⲁⲥⲧⲟⲩⲃⲟⲥ ⲁⲛϫⲱϩⲙ̅ <text:line-break/><text:span text:style-name="T1"> </text:span><text:span text:style-name="T2">(132/12) </text:span> ⲛ̅ⲛ̅ⲛⲟⲉⲓⲕ’ ⲁⲥⲣ̅ ⲃⲣ̅ⲣⲉ ⲇⲉ ⲁⲩⲙⲛ̅ⲧ̅ϣⲉⲗⲉⲉⲧ’ <text:line-break/><text:span text:style-name="T1"> </text:span><text:span text:style-name="T2">(132/13) </text:span> ⲁⲥⲧⲟⲩⲃⲟⲥ ϩⲙ̅ 〈ⲡ〉ⲙⲁ ⲛ̅ϣⲉⲗⲉⲉⲧ’ ⲁⲥⲙⲁϩϥ ⲛ̅ⲥϯ‐ <text:line-break/><text:span text:style-name="T1"> </text:span><text:span text:style-name="T2">(132/14) </text:span> ⲛⲟⲩϥⲉ ⲁⲥϩⲙⲟⲟⲥ ⲛ̅ϩⲟⲩⲛ’ ⲛ̅ϩⲏⲧϥ̅ ⲉⲥϭⲱϣⲧ’ <text:line-break/><text:span text:style-name="T1"> </text:span><text:span text:style-name="T2">(132/15) </text:span> ⲉⲃⲟⲗ’ ϩⲏⲧϥ̅ ⲙ̅ⲡⲣⲙ̅ϣⲉⲗⲉⲉⲧ’ ⲙ̅ⲙⲉ ⲟⲩⲕⲉⲧⲓ <text:line-break/><text:span text:style-name="T1"> </text:span><text:span text:style-name="T2">(132/16) </text:span> ⲥⲡⲏⲧ’ ϩⲛ̅ ⲧⲁⲅⲟⲣⲁ ⲉⲥⲕⲟⲓⲛⲱⲛⲉⲓ ⲙⲛ̅ ⲡⲉⲧⲥ̅‐ <text:line-break/><text:span text:style-name="T1"> </text:span><text:span text:style-name="T2">(132/17) </text:span> ⲟⲩⲟϣϥ’ ⲁⲗⲗⲁ ⲁⲥϭⲱ ⲉⲥϭⲟϣⲧ’ ⲉⲃⲟⲗ ϩⲏⲧϥ̅ <text:line-break/><text:span text:style-name="T1"> </text:span><text:span text:style-name="T2">(132/18) </text:span> ϫⲉ ⲁϣ ⲛ̅ϩⲟⲟⲩ ⲉϥⲛ̅ⲛⲏⲩ ⲉⲥⲣ̅ ϩⲟⲧⲉ ϩⲏⲧϥ̅ <text:line-break/><text:span text:style-name="T1"> </text:span><text:span text:style-name="T2">(132/19) </text:span> ⲛⲉⲥⲥⲟⲟⲩⲛ ⲅⲁⲣ ⲁⲛ ⲙ̅ⲡⲉϥⲉⲓⲛⲉ ⲟⲩⲕⲉ‐ <text:line-break/><text:span text:style-name="T1"> </text:span><text:span text:style-name="T2">(132/20) </text:span> ⲧⲓ ⲥⲣ̅ ⲡⲙⲉⲉⲩⲉ ϫⲓⲙ ⲡⲟⲩⲟⲉⲓϣ ⲛ̅ⲧⲁⲥϩⲉ ⲉ‐ <text:line-break/><text:span text:style-name="T1"> </text:span><text:span text:style-name="T2">(132/21) </text:span> ⲃⲟⲗ ϩⲙ̅ ⲡⲏⲉⲓ ⲙ̅ⲡⲉⲥⲉⲓⲱⲧ’ ϩⲙ̅ ⲡⲟⲩⲱϣⲉ <text:line-break/><text:span text:style-name="T1"> </text:span><text:span text:style-name="T2">(132/22) </text:span> ⲇⲉ ⲙ̅ⲡⲉⲓⲱⲧ’ 〈 〉 ⲁⲥⲡⲣ̅ⲣⲉ ⲣⲁⲥⲟⲩ ⲇⲉ ⲉⲣⲟϥ ⲛ̅ⲑⲉ <text:line-break/><text:span text:style-name="T1"> </text:span><text:span text:style-name="T2">(132/23) </text:span> ⲛ̅ⲛⲓϩⲓⲟⲙⲉ ⲉⲧⲙⲉ ⲛ̅ⲛⲓϩⲟⲟⲩⲧ’ §ⲧⲟⲧⲉ ϭⲉ <text:line-break/><text:span text:style-name="T1"> </text:span><text:span text:style-name="T2">(132/24) </text:span> ⲡⲣⲙ̅ϣⲉⲗⲉⲉⲧ’ ⲕⲁⲧⲁ ⲡⲟⲩⲱϣ ⲙ̅ⲡⲉⲓⲱⲧ’ <text:line-break/><text:span text:style-name="T1"> </text:span><text:span text:style-name="T2">(132/25) </text:span> ⲁϥⲉⲓ ⲉⲡⲓⲧⲛ̅ ϣⲁⲣⲟⲥ ⲉϩⲟⲩⲛ ⲉⲡⲙⲁ ⲛ̅ϣⲉ‐ <text:line-break/><text:span text:style-name="T1"> </text:span><text:span text:style-name="T2">(132/26) </text:span> ⲗⲉⲉⲧ’ ⲉⲧⲥⲃ̅ⲧⲱⲧ’ ⲁϥⲕⲟⲥⲙⲉⲓ’ ⲇⲉ ⲙ̅ⲡⲛⲩⲙ‐ <text:line-break/><text:span text:style-name="T1"> </text:span><text:span text:style-name="T2">(132/27) </text:span> ⲫⲱⲛ §ⲉⲡⲅⲁⲙⲟⲥ ⲅⲁⲣ’ ⲉⲧⲙ̅ⲙⲁⲁⲩ ⲉϥϣⲟⲟⲡ’ <text:line-break/><text:span text:style-name="T1"> </text:span><text:span text:style-name="T2">(132/28) </text:span> ⲁⲛ ⲛ̅ⲑⲉ ⲙ̅ⲡⲅⲁⲙⲟⲥ ⲛ̅ⲥⲁⲣⲕⲓⲕⲟⲥ ⲛⲉⲧⲁⲣ’‐ <text:line-break/><text:span text:style-name="T1"> </text:span><text:span text:style-name="T2">(132/29) </text:span> ⲕⲟⲓⲛⲱⲛⲉⲓ ⲙⲛ̅ ⲛⲟⲩⲣⲏⲩ’ ϣⲁⲩⲥⲓ ⲛ̅ⲧⲕⲟⲓ‐ <text:line-break/><text:span text:style-name="T1"> </text:span><text:span text:style-name="T2">(132/30) </text:span> ⲛⲱⲛⲓⲁ ⲉⲧⲙ̅ⲙⲁⲩ ⲁⲩⲱ ⲛ̅ⲑⲉ ⲛ̅ⲛⲓⲉⲧⲡⲱ <text:line-break/><text:span text:style-name="T1"> </text:span><text:span text:style-name="T2">(132/31) </text:span> ϣⲁⲩⲕⲱ ⲛ̅ⲥⲱⲟⲩ ⲛ̅ⲧⲉⲛⲱⲭⲗⲏⲥⲓⲥ̣ [ⲛ]ⲧⲉ‐ <text:line-break/><text:soft-page-break/><text:span text:style-name="T1"> </text:span><text:span text:style-name="T2">(132/32) </text:span> ⲡⲓⲑⲩⲙⲉⲓⲁ ⲁⲩⲱ ⲛ̅ⲥⲉⲧⲕ̣[ⲧⲟ] ⲛ̣̅[ⲛⲟⲩϩⲟ ⲉⲃ]ⲟ̣ⲗ <text:line-break/><text:span text:style-name="T1"> </text:span><text:span text:style-name="T2">(132/33) </text:span> ⲛ̅ⲛⲟⲩⲉⲣⲏⲩ ⲁⲗⲗⲁ ⲡⲉⲉⲓ̣[......].[.]ⲛ ⲡⲉ <text:line-break/><text:span text:style-name="T1"> </text:span><text:span text:style-name="T2">(132/34) </text:span> ⲡⲉⲉⲓⲅⲁⲙⲟⲥ ⲁⲗⲗⲁ ⲉⲩϣⲁⲛ̣[ⲡ]ϩ̣ⲛ̣̅ϩⲱⲧⲣ̅ <text:line-break/><text:span text:style-name="T1"> </text:span><text:span text:style-name="T2">(132/35) </text:span> ⲁ̣ⲛ[ⲟ]ⲩ[ⲉⲣⲏ]ⲩ̣ ϣ̣ⲁ̣ⲩϣⲱⲡⲉ ⲁⲩⲱⲛϩ ⲟⲩⲱⲧ’ . <text:line-break/><text:span text:style-name="T1"> </text:span><text:span text:style-name="T2">(133/1) </text:span> ⲉⲧⲃⲉ ⲡⲁⲉⲓ ⲡⲉϫⲁϥ ⲛ̅ϭⲓ ⲡⲉⲡⲣⲟⲫⲏⲧⲏⲥ <text:line-break/><text:span text:style-name="T1"> </text:span><text:span text:style-name="T2">(133/2) </text:span> ⲉⲧⲃⲉ ⲡϣⲟⲣⲡ’ ⲣ̅ⲣⲱⲙⲉ ⲙⲛ̅ ⲧϣⲟⲣⲡ’ ⲛ̅ⲥϩⲓ‐ <text:line-break/><text:span text:style-name="T1"> </text:span><text:span text:style-name="T2">(133/3) </text:span> ⲙⲉ ϫⲉ §ⲥⲉⲛⲁϣⲱⲡⲉ ⲁⲩⲥⲁⲣⲝ ⲟⲩⲱⲧ’ ⲛⲉⲩ‐ <text:line-break/><text:span text:style-name="T1"> </text:span><text:span text:style-name="T2">(133/4) </text:span> ϩⲟⲧⲣ̅ ⲅⲁⲣ ⲉⲛⲟⲩⲉⲣⲏⲩ ⲛ̅ϣⲟⲣⲡ ϩⲁϩⲧⲙ̅ ⲡⲉⲓⲱⲧ’ <text:line-break/><text:span text:style-name="T1"> </text:span><text:span text:style-name="T2">(133/5) </text:span> ⲉⲙⲡⲁⲧⲉ ⲧⲥϩⲓⲙⲉ ⲥⲱⲣⲙ ⲙ̅ⲫⲟⲟⲩⲧ’ ⲉⲧⲉ <text:line-break/><text:span text:style-name="T1"> </text:span><text:span text:style-name="T2">(133/6) </text:span> ⲡⲉⲥⲥⲟⲛ ⲡⲉ ⲡⲁⲗⲓⲛ ⲟⲛ ⲁⲡⲡⲉⲉⲓⲅⲁⲙⲟⲥ <text:line-break/><text:span text:style-name="T1"> </text:span><text:span text:style-name="T2">(133/7) </text:span> ⲥⲟⲟⲩϩⲟⲩ ⲉϩⲟⲩⲛ ⲉⲛⲟⲩⲉⲣⲏⲩ ⲁⲩⲱ ⲁⲧⲯⲩ‐ <text:line-break/><text:span text:style-name="T1"> </text:span><text:span text:style-name="T2">(133/8) </text:span> ⲭⲏ ϩⲱⲧⲣ̅ ⲉϩⲟⲩⲛ ⲉⲡⲉⲥⲙⲉⲣⲉⲓⲧ’ ⲛⲁⲙⲉ ⲡⲉⲥ‐ <text:line-break/><text:span text:style-name="T1"> </text:span><text:span text:style-name="T2">(133/9) </text:span> ⲫⲩⲥⲓⲕⲟⲥ ⲛ̅ϫⲟⲉⲓⲥ ⲕⲁⲧⲁ ⲑⲉ ⲉⲧϥⲥⲏϩ ϫⲉ §ⲡϫⲟ‐ <text:line-break/><text:span text:style-name="T1"> </text:span><text:span text:style-name="T2">(133/10) </text:span> ⲉⲓⲥ ⲅⲁⲣ ⲛ̅ⲧⲉⲥϩⲓⲙⲉ ⲡⲉ ⲡⲉⲥϩⲁⲓ̈ §ⲁⲥⲥⲟⲩⲱⲛϥ’ <text:line-break/><text:span text:style-name="T1"> </text:span><text:span text:style-name="T2">(133/11) </text:span> ⲇⲉ ϣⲏⲙ’ ϣⲏⲙ’ ⲁⲩⲱ ⲁⲥⲣⲁϣⲉ ϩⲛ̅ⲕⲉⲥⲟⲡ’ ⲉⲥⲣⲓ‐ <text:line-break/><text:span text:style-name="T1"> </text:span><text:span text:style-name="T2">(133/12) </text:span> ⲙⲉ ϩⲁⲧⲟⲟⲧϥ’ ⲛ̅ⲧⲁⲣⲉⲥⲣ̅ ⲡⲙⲉⲉⲩⲉ ⲛ̅ⲧⲉⲥⲁⲥ‐ <text:line-break/><text:span text:style-name="T1"> </text:span><text:span text:style-name="T2">(133/13) </text:span> ⲭⲏⲙⲟⲥⲩⲛⲏ ⲛ̅ⲧⲉⲥⲙ̅ⲛ̅ⲧⲭⲏⲣⲁ ⲛ̅ϣⲟⲣⲡ’ <text:line-break/><text:span text:style-name="T1"> </text:span><text:span text:style-name="T2">(133/14) </text:span> ⲁⲩⲱ ⲁⲥⲕⲟⲥⲙⲉⲓ ⲙ̅ⲙⲟⲥ ⲛ̅ϩⲟⲩⲟ ϣⲓⲛⲉ ⲉⲥ‐ <text:line-break/><text:span text:style-name="T1"> </text:span><text:span text:style-name="T2">(133/15) </text:span> ⲛⲁⲣ ⲉⲛⲁϥ ⲛ̅ϭⲱ ϩⲁⲧⲟⲟⲧⲥ̅ §ⲡⲉϫⲁϥ ⲇⲉ ⲛ̅ϭⲓ <text:line-break/><text:span text:style-name="T1"> </text:span><text:span text:style-name="T2">(133/16) </text:span> ⲡⲉⲡⲣⲟⲫⲏⲧⲏⲥ ϩⲛ̅ⲛ̅ⲙ̅ⲯⲁⲗⲙⲟⲥ ϫⲉ §ⲥⲱ‐ <text:line-break/><text:span text:style-name="T1"> </text:span><text:span text:style-name="T2">(133/17) </text:span> ⲧⲙ̅ ⲧⲁϣⲉⲉⲣⲉ ⲛ̅ⲧⲉⲛⲁⲩ ⲛ̅ⲧⲉⲣⲓⲕⲉ §ⲙ̅ⲡⲉⲙⲁ‐ <text:line-break/><text:span text:style-name="T1"> </text:span><text:span text:style-name="T2">(133/18) </text:span> ⲁϫⲉ ⲛ̅ⲧⲉⲣ̅ ⲡⲱⲃϣ ⲙ̅ⲡⲟⲩⲗⲁⲟⲥ §ⲙⲛ̅ ⲡⲏⲉⲓ <text:line-break/><text:span text:style-name="T1"> </text:span><text:span text:style-name="T2">(133/19) </text:span> ⲙ̅ⲡⲉⲉⲓⲱⲧ ϫⲉ ⲁⲡⲣ̅ⲣⲟ §ⲉⲡⲓⲑⲩⲙⲉⲓ ⲉⲡⲟⲩⲥⲁ‐ <text:line-break/><text:span text:style-name="T1"> </text:span><text:span text:style-name="T2">(133/20) </text:span> ⲉⲓⲉ ϫⲉ ⲛ̅ⲧⲟϥ §ⲡⲉ ⲡⲟⲩϫⲟⲉⲓⲥ ϥⲣ̅ⲁⲝⲓⲟⲩ ⲅⲁⲣ <text:line-break/><text:span text:style-name="T1"> </text:span><text:span text:style-name="T2">(133/21) </text:span> ⲙ̅ⲙⲟⲥ ⲁⲧⲣⲉⲥⲕⲧⲉ ⲡⲉⲥϩⲟ ⲉⲃⲟⲗ’ ⲙ̅ⲡⲉⲥ‐ <text:line-break/><text:span text:style-name="T1"> </text:span><text:span text:style-name="T2">(133/22) </text:span> ⲗⲁⲟⲥ ⲙⲛ̅ ⲡⲙⲏⲏϣⲉ ⲛ̅ⲛⲉⲥⲙⲟⲓⲭⲟⲥ ⲛⲁ‐ <text:line-break/><text:span text:style-name="T1"> </text:span><text:span text:style-name="T2">(133/23) </text:span> ⲉⲓ ⲛⲉⲥϩⲛ̅ ⲧⲟⲩⲙⲏⲧⲉ ⲛ̅ϣⲟⲣⲡ ⲛⲉⲥⲣ̅ⲡⲣ[ⲟ]ⲥ‐ <text:line-break/><text:span text:style-name="T1"> </text:span><text:span text:style-name="T2">(133/24) </text:span> ⲉⲭⲉ ⲁⲡⲉⲥⲣ̅ⲣⲟ ⲟⲩⲁⲁⲧϥ’ ⲡⲉⲥⲫⲩⲥⲓⲕⲟ̣ⲥ <text:line-break/><text:span text:style-name="T1"> </text:span><text:span text:style-name="T2">(133/25) </text:span> ⲛ̅ϫⲟⲉⲓⲥ ⲁⲩⲱ ⲛ̅ⲥⲣ̅ ⲡⲱⲃϣ ⲙ̅ⲡⲏⲉⲓ ⲙ̅ⲡⲉⲓ‐ <text:line-break/><text:span text:style-name="T1"> </text:span><text:span text:style-name="T2">(133/26) </text:span> ⲱⲧ’ ⲙ̅ⲡⲕⲁϩ ⲡⲁⲉⲓ ⲉⲛⲉⲥϣⲟⲟⲡ ϩⲁⲧⲟⲟⲧϥ’ <text:line-break/><text:span text:style-name="T1"> </text:span><text:span text:style-name="T2">(133/27) </text:span> ⲕⲁⲕⲱⲥ ⲛ̅ⲥⲣ̅ ⲡⲙⲉⲉⲩⲉ ⲛ̅ⲧⲟϥ ⲙ̅ⲡⲉⲥⲉⲓⲱⲧ <text:line-break/><text:span text:style-name="T1"> </text:span><text:span text:style-name="T2">(133/28) </text:span> ⲉⲧϩⲛ̅ ⲙ̅ⲡⲏⲩⲉ ⲧⲉⲉⲓ ⲟⲛ ⲧⲉ ⲑⲉ ⲉⲛⲧⲁⲩϫⲟ‐ <text:line-break/><text:span text:style-name="T1"> </text:span><text:span text:style-name="T2">(133/29) </text:span> ⲟⲥ ⲛ̅ⲁⲃⲣⲁϩⲁⲙ ϫⲉ §ⲁⲙⲟⲩ ⲉⲃⲟⲗ ϩⲙ̅ ⲡⲉⲕ’‐ <text:line-break/><text:span text:style-name="T1"> </text:span><text:span text:style-name="T2">(133/30) </text:span> ⲕⲁϩ ⲙⲛ̅ §ⲧⲉⲕⲥⲩⲛⲅⲉⲛⲉⲓⲁ ⲁⲩⲱ ⲉⲃⲟⲗ ϩⲙ̅ <text:line-break/><text:span text:style-name="T1"> </text:span><text:span text:style-name="T2">(133/31) </text:span> ⲡⲏ[ⲉ]ⲓ̣ §ⲙ̅ⲡⲉⲕ’ⲉⲓⲱⲧ’ §ⲧⲁⲉⲓ ⲧⲉ ⲑⲉ ⲛ̅ⲧⲁⲣⲉ ⲧⲯⲩ‐ <text:line-break/><text:span text:style-name="T1"> </text:span><text:span text:style-name="T2">(133/32) </text:span> ⲭ[ⲏ ⲣ̅ⲕ]ⲟ̣[ⲥ]ⲙ̣ⲉⲓ̣ ⲙ̣̅ⲙⲟⲥ ϩⲛ̅ ⲧⲉⲥⲙ̅ⲛ̅ⲧ̅ⲥⲁⲉⲓⲉ <text:line-break/><text:span text:style-name="T1"> </text:span><text:span text:style-name="T2">(133/33) </text:span> ⲟⲛ̣ [.......]ⲙⲉⲉⲧⲉ ⲉⲡⲉⲥⲙⲉⲣⲉⲓⲧ’ <text:line-break/><text:span text:style-name="T1"> </text:span><text:span text:style-name="T2">(133/34) </text:span> ⲁⲩⲱ ⲛ̅[ⲧⲟϥ ϩⲱ]ⲱϥ ⲁϥⲙⲉⲣⲉⲓⲧⲥ̅ ⲁⲩⲱ ⲛ̅‐ <text:line-break/><text:span text:style-name="T1"> </text:span><text:span text:style-name="T2">(133/35) </text:span> ⲧⲁⲣⲉⲥⲣ̅ⲕⲟ̣[ⲓ]ⲛⲱⲛⲉⲓ ⲛⲙ̅ⲙⲁϥ [ⲁ]ⲥϫⲓ ⲙ̣̅‐ <text:line-break/><text:span text:style-name="T1"> </text:span><text:span text:style-name="T2">(134/1) </text:span> ⲡⲉⲥⲡⲉⲣⲙⲁ ⲉⲃⲟⲗ ϩⲓⲧⲟⲟⲧϥ̅ ⲉⲧⲉ ⲡⲡⲛ̅ⲁ̅ <text:line-break/><text:span text:style-name="T1"> </text:span><text:span text:style-name="T2">(134/2) </text:span> ⲡⲉ ⲉⲧ’ⲧⲛ̅ϩⲟ ϣⲁⲛⲧⲉⲥϫⲡⲟ ⲛ̅ϩⲛ̅ϣⲏⲣⲉ <text:line-break/><text:span text:style-name="T1"> </text:span><text:span text:style-name="T2">(134/3) </text:span> ⲉⲃⲟⲗ ⲛ̅ϩⲏⲧϥ’ ⲉⲛⲁⲛⲟⲩⲟⲩ ⲛ̅ⲥⲥⲁⲛⲟⲩϣⲟⲩ <text:line-break/><text:span text:style-name="T1"> </text:span><text:span text:style-name="T2">(134/4) </text:span> ⲡⲁⲉⲓ ⲅⲁⲣ’ ⲡⲉ ⲡⲛⲟϭ ⲛ̅ⲧⲉⲗⲉⲓⲟⲛ ⲛ̅ⲑⲁⲩⲙⲁ <text:line-break/><text:span text:style-name="T1"> </text:span><text:span text:style-name="T2">(134/5) </text:span> ⲛ̅ϫⲡⲟ ϩⲱⲥⲧⲉ ⲡⲉⲉⲓⲅⲁⲙⲟⲥ ⲉϥϫⲱⲕ’ ⲉⲃⲟⲗ <text:line-break/><text:span text:style-name="T1"> </text:span><text:span text:style-name="T2">(134/6) </text:span> ϩⲙ̅ ⲡⲟⲩⲱϣ ⲙ̅ⲡⲉⲓⲱⲧ’ §ϣϣⲉ ⲇⲉ ⲁⲧⲣⲉ ⲧⲯⲩ‐ <text:line-break/><text:span text:style-name="T1"> </text:span><text:span text:style-name="T2">(134/7) </text:span> ⲭⲏ ϫⲡⲟⲥ ⲟⲩⲁⲁⲧⲥ̅ ⲛ̅ⲥϣⲱⲡⲉ ⲟⲛ’ ⲛ̅ⲧⲉⲥ‐ <text:line-break/><text:span text:style-name="T1"> </text:span><text:span text:style-name="T2">(134/8) </text:span> ϩⲉ ⲛ̅ϣⲟⲣⲡ’ ⲧⲯⲩⲭⲏ ϭⲉ ϣⲁⲣⲉⲥⲕⲓⲙ’ ⲟⲩⲁ‐ <text:line-break/><text:soft-page-break/><text:span text:style-name="T1"> </text:span><text:span text:style-name="T2">(134/9) </text:span> ⲁⲧⲥ̅ ⲁⲩⲱ ⲁⲥϫⲓ ⲡⲑⲉⲓⲟⲛ ⲛ̅ⲧⲙ̅ ⲡⲉⲓⲱⲧ’ ⲁ’‐ <text:line-break/><text:span text:style-name="T1"> </text:span><text:span text:style-name="T2">(134/10) </text:span> ⲧⲣⲉⲥⲣ̅ ⲃⲣ̅ⲣⲉ ϫⲉⲕⲁⲁⲥ ⲟⲛ ⲉⲩⲛⲁϫⲓⲧⲥ̅ ⲉ‐ <text:line-break/><text:span text:style-name="T1"> </text:span><text:span text:style-name="T2">(134/11) </text:span> ⲡⲙⲁ ⲉⲛⲉⲥⲙ̅ⲙⲁⲩ ϫⲓⲛ’ ϣⲟⲣⲡ’ ⲧⲁⲉⲓ ⲧⲉ <text:line-break/><text:span text:style-name="T1"> </text:span><text:span text:style-name="T2">(134/12) </text:span> ⲧⲁⲛⲁⲥⲧⲁⲥⲓⲥ ⲉⲧ’ϣⲟⲟⲡ ⲉⲃⲟⲗ ϩⲛ̅ ⲛⲉⲧⲙⲟ‐ <text:line-break/><text:span text:style-name="T1"> </text:span><text:span text:style-name="T2">(134/13) </text:span> ⲟⲩⲧ’ ⲡⲁⲉⲓ ⲡⲉ ⲡⲥⲱⲧⲉ ⲛ̅ⲧⲁⲓⲭⲙⲁⲗⲱⲥⲓⲁ ⲧⲁ‐ <text:line-break/><text:span text:style-name="T1"> </text:span><text:span text:style-name="T2">(134/14) </text:span> ⲉⲓ ⲧⲉ ⲧⲁⲛⲧⲃⲁⲥⲓⲥ ⲛ̅ⲃⲱⲕ’ ⲉϩⲣⲁⲓ̈ ⲉⲧⲡⲉ ⲧⲁⲉⲓ <text:line-break/><text:span text:style-name="T1"> </text:span><text:span text:style-name="T2">(134/15) </text:span> ⲧⲉ ⲑⲟⲇⲟⲥ ⲛ̅ⲃⲱⲕ’ ⲉϩⲣⲁⲓ̈ ϣⲁ ⲡⲉⲓⲱⲧ’ §ⲇⲓⲁ <text:line-break/><text:span text:style-name="T1"> </text:span><text:span text:style-name="T2">(134/16) </text:span> ⲧⲟⲩⲧⲟ ⲡⲉϫⲉ ⲡⲉⲡⲣⲟⲫⲏⲧⲏⲥ’ ϫⲉ §ⲧⲁⲯⲩ‐ <text:line-break/><text:span text:style-name="T1"> </text:span><text:span text:style-name="T2">(134/17) </text:span> ⲭⲏ ⲉⲣⲓⲉⲩⲗⲟⲅⲉⲓ ⲙ̅ⲡϫⲟⲉⲓⲥ ⲁⲩⲱ ⲛⲁ §ⲡⲥⲁ ⲛ‐ <text:line-break/><text:span text:style-name="T1"> </text:span><text:span text:style-name="T2">(134/18) </text:span> ϩⲟⲩⲛ ⲧⲏⲣⲟⲩ ⲙ̅ⲡⲉϥⲣⲁⲛ’ §ⲉⲧⲟⲩⲁⲁⲃ’ ⲧⲁⲯⲩ‐ <text:line-break/><text:span text:style-name="T1"> </text:span><text:span text:style-name="T2">(134/19) </text:span> ⲭⲏ ⲉⲣⲓⲉⲩⲗⲟⲅⲉⲓ §ⲙ̅ⲡⲛⲟⲩⲧⲉ’ ⲡⲉⲛⲧⲁϩⲕⲱ <text:line-break/><text:span text:style-name="T1"> </text:span><text:span text:style-name="T2">(134/20) </text:span> ⲉⲃⲟⲗ §ⲛ̅ⲛⲉ⟦ⲛ⟧ⲁⲛⲟⲙⲓⲁ’ ⲧⲏⲣⲟⲩ ⲡⲉⲛⲧⲁϩⲧⲁⲗ‐ <text:line-break/><text:span text:style-name="T1"> </text:span><text:span text:style-name="T2">(134/21) </text:span> ϭⲟ §ⲛ̅ⲛⲉϣⲱⲛⲉ ⲧⲏⲣⲟⲩ ⲡⲉⲛⲧⲁϩⲥⲱⲧⲉ <text:line-break/><text:span text:style-name="T1"> </text:span><text:span text:style-name="T2">(134/22) </text:span> ⲙ̅ⲡⲉⲱⲛϩ §ⲉⲃⲟⲗ ϩⲙ̅ ⲡⲙⲟⲩ ⲡⲉⲛⲧⲁϩϯ <text:line-break/><text:span text:style-name="T1"> </text:span><text:span text:style-name="T2">(134/23) </text:span> [ⲕ]ⲗⲟⲙ’ ⲉϫⲱ §ϩⲛ̅ ⲟⲩⲛⲁ’ ⲡⲉⲧⲧ〈ⲥ〉ⲉⲓⲟ ⲛ̅ⲧⲉⲉⲡⲓ‐ <text:line-break/><text:span text:style-name="T1"> </text:span><text:span text:style-name="T2">(134/24) </text:span> [ⲑ]ⲩⲙⲓⲁ §ϩⲛ̅ ⲛ̅ⲁⲅⲁⲑⲟⲛ ⲧⲉⲙⲛⲧⲕⲟⲩⲉⲓ ⲛⲁ‐ <text:line-break/><text:span text:style-name="T1"> </text:span><text:span text:style-name="T2">(134/25) </text:span> ⲣ̅ §ⲃⲣ̅ⲣⲉ ⲛ̅ⲑⲉ ⲛ̅ⲧⲁ ⲟⲩⲁⲉⲧⲟⲥ §ⲉⲥϣⲁⲣ̅ ⲃⲣ̅ⲣⲉ <text:line-break/><text:span text:style-name="T1"> </text:span><text:span text:style-name="T2">(134/26) </text:span> ϭⲉ ⲥⲛⲁⲃⲱⲕ’ ⲉϩⲣⲁⲓ̈ ⲉⲥⲥⲙⲟⲩ ⲉⲡⲉⲓⲱⲧ’ <text:line-break/><text:span text:style-name="T1"> </text:span><text:span text:style-name="T2">(134/27) </text:span> ⲙⲛ̅ ⲡⲉⲥⲥⲟⲛ ⲡⲁⲉⲓ ⲛ̅ⲧⲁⲥⲟⲩϫⲁⲉⲓ ⲉⲃⲟⲗ <text:line-break/><text:span text:style-name="T1"> </text:span><text:span text:style-name="T2">(134/28) </text:span> ϩⲓⲧⲟⲟⲧϥ̅ ⲧⲁⲉⲓ ⲧⲉ ⲑⲉ ⲛ̅ⲧⲯⲩⲭⲏ ⲉⲥⲛⲁⲟⲩ‐ <text:line-break/><text:span text:style-name="T1"> </text:span><text:span text:style-name="T2">(134/29) </text:span> ϫⲁⲉⲓ ϩⲓⲧⲛ̅ ⲡⲉϫⲡⲟ ⲛ̅ⲕⲉⲥⲟⲡ’ ⲡⲁⲉⲓ ⲇⲉ <text:line-break/><text:span text:style-name="T1"> </text:span><text:span text:style-name="T2">(134/30) </text:span> ⲉⲃⲟⲗ ϩⲛ̅ ⲛ̅ϣⲁϫⲉ ⲁⲛ ⲛ̅ⲁⲥⲕⲏⲥⲓⲥ ⲉϣⲁϥ’‐ <text:line-break/><text:span text:style-name="T1"> </text:span><text:span text:style-name="T2">(134/31) </text:span> ⲉⲓ ⲟⲩⲇⲉ ⲉⲃⲟⲗ ⲁⲛ ϩⲛ̅ ⲛ̅ⲧⲉⲭⲛⲏ ⲟⲩ[ⲇ]ⲉ̣ ϩⲛ̅‐ <text:line-break/><text:span text:style-name="T1"> </text:span><text:span text:style-name="T2">(134/32) </text:span> ⲥⲃⲱ ⲛ̅ⲥϩⲁⲓ̈ ⲁⲗⲗⲁ ⲧⲭⲁⲣⲓ̣[ⲥ] ⲙ̣̅ⲡ̣[... ⲧ]ⲉ̣ <text:line-break/><text:span text:style-name="T1"> </text:span><text:span text:style-name="T2">(134/33) </text:span> ⲁⲗⲗⲁ ⲧⲇⲱⲣⲉⲁ ⲙ̅ⲡⲛ[.........]ⲁ̣ⲉ <text:line-break/><text:span text:style-name="T1"> </text:span><text:span text:style-name="T2">(134/34) </text:span> ⲡⲉⲉⲓϩⲱⲃ ⲅⲁⲣ ⲟⲩⲉⲓⲉⲓ ⲡⲉ ⲙ̣̅[ⲡⲥⲁ] ⲛ̣ⲧ̣ⲡⲉ §ⲇⲓⲁ <text:line-break/><text:span text:style-name="T1"> </text:span><text:span text:style-name="T2">(134/35) </text:span> ⲧⲟ̣ⲩ̣ⲧⲟ̣ ϥ̣[ⲁ]ϣ̣ⲕⲁⲕ’ ⲉⲃⲟⲗ ⲛ̅ϭⲓ ⲡⲥⲱⲧⲏⲣ’ <text:line-break/><text:span text:style-name="T1"> </text:span><text:span text:style-name="T2">(135/1) </text:span> ϫⲉ §ⲙⲛ̅ ⲗⲁⲁⲩ ⲛⲁϣⲉⲓ ϣⲁⲣⲟⲉⲓ ⲉⲓ ⲙⲏⲧⲓ ⲛ̅‐ <text:line-break/><text:span text:style-name="T1"> </text:span><text:span text:style-name="T2">(135/2) </text:span> ⲧⲉ §ⲡⲁⲉⲓⲱⲧ’ ⲥⲱⲕ’ ⲙ̅ⲙⲟϥ’ ⲛ̅ϥⲛⲧ̅ϥ̅ ⲛⲁⲉⲓ <text:line-break/><text:span text:style-name="T1"> </text:span><text:span text:style-name="T2">(135/3) </text:span> ⲁⲩⲱ §〈ⲁ〉ⲛⲟⲕ’ ϩⲱ ϯⲛⲁⲧⲟⲩⲛⲟⲥϥ’ ϩⲙ̅ ⲫϩⲁⲉ ⲛ̅‐ <text:line-break/><text:span text:style-name="T1"> </text:span><text:span text:style-name="T2">(135/4) </text:span> ϩⲟⲟⲩ §ϣϣⲉ ϭⲉ ⲉϣⲗⲏⲗ’ ⲉⲡⲉⲓⲱⲧ ⲛ̅ⲧⲙ̅ⲙⲟⲩ‐ <text:line-break/><text:span text:style-name="T1"> </text:span><text:span text:style-name="T2">(135/5) </text:span> ⲧⲉ ⲉϩⲣⲁⲓ̈ ⲉⲣⲟϥ ϩⲛ̅ ⲧⲙ̅ⲯⲩⲭⲏ ⲧⲏⲣⲥ̅ ϩⲛ̅ ⲛ̅ⲥⲡⲟ‐ <text:line-break/><text:span text:style-name="T1"> </text:span><text:span text:style-name="T2">(135/6) </text:span> ⲧⲟⲩ ⲁⲛ ⲙ̅ⲡⲥⲁ ⲛⲃⲟⲗ’ ⲁⲗⲗⲁ ϩⲙ̅ ⲡⲛⲉⲩⲙⲁ <text:line-break/><text:span text:style-name="T1"> </text:span><text:span text:style-name="T2">(135/7) </text:span> ⲉⲧϩⲓ ⲡⲥⲁ ⲛϩⲟⲩⲛ ⲡⲉⲛⲧⲁϩⲓ ⲉⲃⲟⲗ ϩⲙ̅ ⲡⲃⲁ‐ <text:line-break/><text:span text:style-name="T1"> </text:span><text:span text:style-name="T2">(135/8) </text:span> ⲑⲟⲥ ⲉⲛⲉϣ ⲉϩⲟⲙ ⲉⲛⲣ̅ⲙⲉⲧⲁⲛⲟⲉⲓ ⲉϫⲙ̅ <text:line-break/><text:span text:style-name="T1"> </text:span><text:span text:style-name="T2">(135/9) </text:span> ⲡⲃⲓⲟⲥ ⲛ̅ⲧⲁϩⲛ̅ⲛⲁⲁϥ’ ⲉⲛⲣ̅ⲉⲝϩⲟⲙⲟⲗⲟⲅⲉⲓ <text:line-break/><text:span text:style-name="T1"> </text:span><text:span text:style-name="T2">(135/10) </text:span> ⲛ̅ⲛ〈ⲛ̅〉ⲛⲟⲃⲉ ⲉⲛⲁⲓⲥⲑⲁⲛⲉ ⲉⲧ’ⲡⲗⲁⲛⲏ ⲉⲧϣⲟⲩ‐ <text:line-break/><text:span text:style-name="T1"> </text:span><text:span text:style-name="T2">(135/11) </text:span> ⲉⲓⲧ’ ⲧⲁⲉⲓ ⲛⲉⲛ’ϣⲟⲟⲡ’ ⲛ̅ϩⲏⲧⲥ̅ ⲁⲩⲱ ⲁⲧⲥⲡⲟⲩ‐ <text:line-break/><text:span text:style-name="T1"> </text:span><text:span text:style-name="T2">(135/12) </text:span> ⲇⲏ ⲉⲧϣⲟⲩⲉⲓⲧ’ ⲉⲛⲣⲓⲙⲉ ⲛ̅ⲑⲉ ⲛⲉⲛϣⲟⲟⲡ’ <text:line-break/><text:span text:style-name="T1"> </text:span><text:span text:style-name="T2">(135/13) </text:span> ϩⲙ̅ ⲡⲕⲁⲕⲉ ⲙⲛ̅ ⲫⲟⲉⲓⲙ ⲉⲛⲣ̅ⲡⲉⲛⲑⲉⲓ ⲛⲁⲛ <text:line-break/><text:span text:style-name="T1"> </text:span><text:span text:style-name="T2">(135/14) </text:span> ⲟⲩⲁⲁⲛ ϫⲉⲕⲁⲁⲥ ⲉϥⲛⲁⲛⲁ ⲛⲁⲛ ⲉⲙⲙⲟⲥⲧⲉ <text:line-break/><text:span text:style-name="T1"> </text:span><text:span text:style-name="T2">(135/15) </text:span> ⲙ̅ⲙⲟⲛ ⲛ̅ⲑⲉ ⲉⲧⲛ̅ⲛ̅ϩⲏⲧⲥ̅ ⲧⲉⲛⲟⲩ §ⲡⲁⲗⲓⲛ <text:line-break/><text:span text:style-name="T1"> </text:span><text:span text:style-name="T2">(135/16) </text:span> ⲡⲉϫⲁϥ ⲛ̅ϭⲓ ⲡⲥⲱⲧⲏⲣ ϫⲉ §ϩⲙ̅ⲙⲁⲕⲁⲣⲓⲟⲥ <text:line-break/><text:span text:style-name="T1"> </text:span><text:span text:style-name="T2">(135/17) </text:span> ⲛⲉ ⲛⲁⲉⲓ ⲉⲧⲡⲉⲛⲑⲉⲓ §ϫⲉ ⲛ̅ⲧⲟⲟⲩ ⲡⲉ ⲉⲧⲟⲩⲛⲁ‐ <text:line-break/><text:span text:style-name="T1"> </text:span><text:span text:style-name="T2">(135/18) </text:span> ⲛⲁ ⲛⲁⲩ §ϩⲙ̅ⲙⲁⲕⲁⲣⲓⲟⲥ ⲛⲉⲧϩⲕⲁⲉⲓⲧ’ ϫⲉ ⲛ̅‐ <text:line-break/><text:span text:style-name="T1"> </text:span><text:span text:style-name="T2">(135/19) </text:span> ⲧⲟⲟⲩ §ⲡⲉ ⲉⲧⲛⲁⲥⲉⲓ ⲡⲁⲗⲓⲛ ⲡⲉϫⲁϥ ϫⲉ ⲉ̣[ⲣ]‐ <text:line-break/><text:span text:style-name="T1"> </text:span><text:span text:style-name="T2">(135/20) </text:span> ⲧⲙ̅ⲟⲩⲁ ⲙⲉⲥⲧⲉ ⲧⲉϥⲯⲩⲭⲏ ϥⲛⲁϣ§ⲟⲩϩⲁϥ <text:line-break/><text:soft-page-break/><text:span text:style-name="T1"> </text:span><text:span text:style-name="T2">(135/21) </text:span> ⲁⲛ’ ⲛ̅ⲥⲱⲉⲓ ⲧⲁⲣⲭⲏ ⲅⲁⲣ ⲙ̅ⲡⲟⲩϫⲁⲉⲓ ⲡⲉ ⲧ’‐ <text:line-break/><text:span text:style-name="T1"> </text:span><text:span text:style-name="T2">(135/22) </text:span> ⲙⲉⲧⲁⲛⲟⲓⲁ ⲇⲓⲁ ⲧⲟⲩⲧⲟ §ϩⲁ ⲧⲉϩⲏ ⲛ̅ⲧⲡⲁ̣’‐ <text:line-break/><text:span text:style-name="T1"> </text:span><text:span text:style-name="T2">(135/23) </text:span> ⲣⲟⲩⲥⲓⲁ ⲙ̅ⲡⲉⲭⲣⲥ̅ ⲁϥⲓ ⲛ̅ϭⲓ §ⲓ̈ⲱϩⲁⲛⲛⲏⲥ̣ [ⲉϥ]‐ <text:line-break/><text:span text:style-name="T1"> </text:span><text:span text:style-name="T2">(135/24) </text:span> ⲕⲏⲣⲩⲥⲥⲉ ⲙ̅ⲡⲃⲁⲡⲧⲓⲥⲙⲁ §ⲛ̅ⲧⲙⲉⲧⲁⲛⲟⲓ’ⲁ <text:line-break/><text:span text:style-name="T1"> </text:span><text:span text:style-name="T2">(135/25) </text:span> ⲧⲙⲉⲧⲁⲛⲟⲓⲁ ⲇⲉ ϣⲁⲥϣⲱⲡⲉ ϩⲛ̅ ⲟⲩⲗⲩⲡ’ⲏ <text:line-break/><text:span text:style-name="T1"> </text:span><text:span text:style-name="T2">(135/26) </text:span> ⲙⲛ̅ ⲟⲩⲙ̅ⲕⲁϩ ⲛ̅ϩⲏ’ⲧ ⲡⲉⲓⲱⲧ ⲇⲉ ⲟⲩⲙⲁⲉⲓ‐ <text:line-break/><text:span text:style-name="T1"> </text:span><text:span text:style-name="T2">(135/27) </text:span> ⲣⲱⲙⲉ ⲡ’ⲉ ⲛ̅ⲁⲅⲁⲑⲟⲥ ⲁⲩⲱ ⲉϥⲥⲱⲧⲙ̅ ⲁ’ⲧ‐ <text:line-break/><text:span text:style-name="T1"> </text:span><text:span text:style-name="T2">(135/28) </text:span> ⲯⲩⲭⲏ ⲉⲧⲣ̅ⲉⲡⲓⲕⲁⲗⲉⲓ ⲉϩⲣⲁⲓ̈ ⲉⲣ’ⲟϥ ⲁⲩⲱ ’ⲛ̅ϥ‐ <text:line-break/><text:span text:style-name="T1"> </text:span><text:span text:style-name="T2">(135/29) </text:span> ⲧⲛ̅ⲛⲁⲩ ⲛⲁⲥ ⲙ̅ⲡⲟⲩⲟⲉⲓⲛ ⲛ̅ⲛⲟⲩϫⲁⲉⲓ ⲇⲓⲁ <text:line-break/><text:span text:style-name="T1"> </text:span><text:span text:style-name="T2">(135/30) </text:span> ⲧⲟⲩⲧⲟ ⲡⲉϫⲁϥ ϩⲓⲧⲙ̅ ⲡⲉⲡⲛ̅ⲁ̅ ⲙ̅ⲡⲉⲡⲣⲟ‐ <text:line-break/><text:span text:style-name="T1"> </text:span><text:span text:style-name="T2">(135/31) </text:span> ⲫ[ⲏⲧ]ⲏⲥ ⲇⲉ §ϫⲟⲟⲥ ⲛ̅ⲛ̅ϣⲏⲣⲉ ⲙ̅ⲡⲁⲗⲁⲟⲥ <text:line-break/><text:span text:style-name="T1"> </text:span><text:span text:style-name="T2">(135/32) </text:span> ϫ[ⲉ §ⲉⲣ]ϣ̣[ⲁ] ⲛ̣ⲉ̣ⲧ̣ⲛ̣̅ⲛⲟⲃⲉ ϣⲱⲡⲉ ⲉⲩⲟⲩⲏⲟⲩ <text:line-break/><text:span text:style-name="T1"> </text:span><text:span text:style-name="T2">(135/33) </text:span> ϫ[ⲓⲙ §ⲡⲕⲁϩ ϣⲁ ⲧ]ⲡⲉ ⲁⲩⲱ ⲉⲩϣⲁϣⲱⲡⲉ <text:line-break/><text:span text:style-name="T1"> </text:span><text:span text:style-name="T2">(135/34) </text:span> §ⲉⲩⲧⲣⲉ̣[ϣⲣⲱ]ϣ ⲛ̅ⲑⲉ ⲙ̅ⲡⲕⲟ’ⲕⲕⲟⲥ §ⲁⲩⲱ <text:line-break/><text:span text:style-name="T1"> </text:span><text:span text:style-name="T2">(135/35) </text:span> ⲉⲩⲕⲏⲙ ⲛ̣̅ϩⲟⲩⲟ ⲉⲩϭⲟ[ⲟ]ⲩ[ⲛⲉ §ⲁⲩ]ⲱ̣ [ⲛ̅ⲧⲉ]‐ <text:line-break/><text:span text:style-name="T1"> </text:span><text:span text:style-name="T2">(136/1) </text:span> ⲧⲛ̅ⲕⲟⲧⲧⲏⲩⲧⲛ̅ ϣⲁⲣⲟⲉⲓ §ϩⲛ̅ ⲧⲉⲧⲛ̅ⲯⲩⲭⲏ <text:line-break/><text:span text:style-name="T1"> </text:span><text:span text:style-name="T2">(136/2) </text:span> ⲧⲏⲣⲥ̅ ⲁⲩⲱ ⲛ̅ⲧⲉⲧⲛ̅ϫⲟⲟⲥ §ⲉϩⲣⲁⲓ̈ ⲉⲣⲟⲉⲓ ϫⲉ <text:line-break/><text:span text:style-name="T1"> </text:span><text:span text:style-name="T2">(136/3) </text:span> ⲡⲁⲉⲓⲱ’ⲧ ϯⲛⲁⲥⲱⲧⲙ̅ §ⲉⲣⲱⲧⲛ̅ ⲛ̅ⲑⲉ ⲛ̅ⲛⲟⲩ‐ <text:line-break/><text:span text:style-name="T1"> </text:span><text:span text:style-name="T2">(136/4) </text:span> ⲗⲁⲟⲥ ’ⲉϥⲟⲩⲁⲁⲃ ⲡⲁⲗⲓⲛ ⲕⲉⲙⲁ §ϥϫⲱ ⲙ̅ⲙⲟⲥ <text:line-break/><text:span text:style-name="T1"> </text:span><text:span text:style-name="T2">(136/5) </text:span> ⲛ̅ⲧⲉⲉⲓϩⲉ ⲛ̅ϭⲓ ⲡϫⲟⲉⲓⲥ §ⲡⲉⲧⲟⲩⲁⲁⲃ ⲛ̅ⲧⲉ ⲡⲓ‐ <text:line-break/><text:span text:style-name="T1"> </text:span><text:span text:style-name="T2">(136/6) </text:span> ⲥⲣⲁⲏⲗ ϫⲉ ϩⲟⲧⲁⲛ §ⲉⲕϣⲁⲕⲧⲟ’ⲕ ⲛ̅ⲕⲉϣ ⲉϩⲟ’ⲙ <text:line-break/><text:span text:style-name="T1"> </text:span><text:span text:style-name="T2">(136/7) </text:span> ⲧⲟⲧⲉ §ⲕⲛⲁⲟⲩϫⲁⲉⲓ ⲁⲩⲱ ⲕⲛⲁⲉⲓⲙⲉ ϫⲉ §ⲛⲉⲕⲧⲱⲛ <text:line-break/><text:span text:style-name="T1"> </text:span><text:span text:style-name="T2">(136/8) </text:span> ⲛ̅ϩⲟⲟⲩ ⲉⲕⲛⲁϩⲧⲉ §ⲁⲛⲓⲡⲉ’ⲧϣⲟⲩⲉⲓ’ⲧ ⲡⲁⲗⲓⲛ <text:line-break/><text:span text:style-name="T1"> </text:span><text:span text:style-name="T2">(136/9) </text:span> ⲡⲉϫⲁϥ ⲛ̅ⲕⲉⲙⲁ ϫⲉ §ⲑⲓⲉⲣⲟⲩⲥⲁⲗⲏ’ⲙ ϩⲛ̅ ⲟⲩ‐ <text:line-break/><text:span text:style-name="T1"> </text:span><text:span text:style-name="T2">(136/10) </text:span> ⲣⲓⲙⲉ ⲁⲥⲣⲓⲙⲉ ϫⲉ §ⲛⲁ ⲛⲁⲉⲓ ϥⲛⲁⲛⲁ ⲛ̅ⲧⲉⲥⲙⲏ <text:line-break/><text:span text:style-name="T1"> </text:span><text:span text:style-name="T2">(136/11) </text:span> §ⲙ̅ⲡⲉⲣⲓⲙⲉ ⲁⲩⲱ ⲛ̅ⲧⲁⲣⲉϥⲛⲁⲩ ⲁϥⲥⲱⲧⲙ̅ §ⲉⲣ’ⲟ <text:line-break/><text:span text:style-name="T1"> </text:span><text:span text:style-name="T2">(136/12) </text:span> ⲁⲩⲱ ⲡϫⲟⲉⲓⲥ ⲛⲁϯ ⲛⲏⲧⲛ̅ ⲛ̅ⲟⲩⲟⲉⲓ’ⲕ §ⲛ̅ⲑⲗⲓ‐ <text:line-break/><text:span text:style-name="T1"> </text:span><text:span text:style-name="T2">(136/13) </text:span> ⲯⲓⲭ ⲙⲛ̅ⲛⲟⲩⲙⲟⲟⲩ ⲛ̅ⲗⲱϫϩ ⲥⲉⲛⲁⲥⲱⲧⲉ §ⲁⲛ <text:line-break/><text:span text:style-name="T1"> </text:span><text:span text:style-name="T2">(136/14) </text:span> ϫⲓ’ⲛ ⲧⲉⲛⲟⲩ ⲉⲧⲣⲟⲩⲧϩⲛⲟ ⲉϩⲟⲩⲛ §ⲉⲣⲟ ⲛ̅ϭⲓ <text:line-break/><text:span text:style-name="T1"> </text:span><text:span text:style-name="T2">(136/15) </text:span> † ⲡⲉⲧ̅ⲣ̅ⲡⲗⲁⲛⲁ ⲛⲉⲃⲁⲗ §ⲛⲁⲛⲁⲩ ⲁ’ⲛⲉⲧⲣ̅ⲡⲗⲁⲛⲁ <text:line-break/><text:span text:style-name="T1"> </text:span><text:span text:style-name="T2">(136/16) </text:span> ⲙ̅ⲙⲟ §ϩⲱⲥⲧⲉ ϣϣⲉ ⲁⲣ̅ⲡⲣⲟⲥⲉⲩⲭⲉⲥⲑⲁⲓ ⲉ‐ <text:line-break/><text:span text:style-name="T1"> </text:span><text:span text:style-name="T2">(136/17) </text:span> ⲡⲛⲟⲩⲧⲉ ⲛ̅ⲧⲟⲩϣⲏ ⲙⲛ̅ ⲡⲉϩⲟⲟⲩ ⲉ’ⲙⲡⲱⲣϣ <text:line-break/><text:span text:style-name="T1"> </text:span><text:span text:style-name="T2">(136/18) </text:span> ⲛ̅ⲛ̅ϭⲓϫ ⲉϩⲣⲁⲓ̈ ⲉⲣ’ⲟϥ ⲛ̅ⲑⲉ ⲛ̅ⲛⲉⲧϩⲛ̅ ⲧⲙⲏⲧⲉ <text:line-break/><text:span text:style-name="T1"> </text:span><text:span text:style-name="T2">(136/19) </text:span> ⲛ̅ⲑⲁⲗⲁⲥⲥⲁ ⲉⲧⲡⲗⲉⲁ ϣⲁⲩϣⲗⲏⲗ ⲉⲡⲛⲟⲩ‐ <text:line-break/><text:span text:style-name="T1"> </text:span><text:span text:style-name="T2">(136/20) </text:span> ⲧ̣ⲉ ϩⲙ̅ ⲡⲟⲩϩⲏⲧ ⲧⲏ’ⲣϥ ϩⲛ̅ⲛⲟⲩϩⲩⲡⲟⲕⲣⲓⲥⲓⲥ <text:line-break/><text:span text:style-name="T1"> </text:span><text:span text:style-name="T2">(136/21) </text:span> ⲁⲛ ϫⲉ ⲛⲉ’ⲧⲡⲣⲟⲥⲉⲩⲭⲉⲥⲑⲁⲓ ϩⲛ̅ⲛⲟⲩϩⲩ‐ <text:line-break/><text:span text:style-name="T1"> </text:span><text:span text:style-name="T2">(136/22) </text:span> ⲡⲟⲕⲣⲓⲥⲓⲥ ⲉⲩⲁⲡⲁⲧⲁ ⲙ̅ⲙⲟⲟⲩ ⲟⲩⲁⲧⲟⲩ ⲉ‐ <text:line-break/><text:span text:style-name="T1"> </text:span><text:span text:style-name="T2">(136/23) </text:span> ⲡ̣ⲛⲟⲩⲧⲉ ⲅⲁⲣ ϭⲱϣ’ⲧ ⲛ̅ⲥⲁ ⲛ̅ϭⲗⲁⲧⲉ ⲁⲩ’ⲱ <text:line-break/><text:span text:style-name="T1"> </text:span><text:span text:style-name="T2">(136/24) </text:span> ⲉ̣ϥ̣ⲙⲟⲩϣ’ⲧ ⲙ̅ⲫⲏ’ⲧ ⲉⲧⲙ̅ⲡⲥⲁ ⲙⲡⲓⲧⲛ̅ <text:line-break/><text:span text:style-name="T1"> </text:span><text:span text:style-name="T2">(136/25) </text:span> ⲉⲧⲣ’ⲉϥⲉⲓⲙⲉ ⲉⲡⲁⲝⲓⲟⲥ ⲛ̅ⲛⲟⲩϫⲁⲉⲓ ⲙⲛ̅ ⲗⲁ‐ <text:line-break/><text:span text:style-name="T1"> </text:span><text:span text:style-name="T2">(136/26) </text:span> ⲁⲩ ⲅⲁⲣ ⲟⲉⲓ ⲛ̅ⲁⲝⲓⲟⲥ ⲙ̅ⲡⲟⲩϫⲁⲉⲓ ⲉⲧⲓ ⲉϥⲙⲉ <text:line-break/><text:span text:style-name="T1"> </text:span><text:span text:style-name="T2">(136/27) </text:span> ⲙ̅ⲡⲧⲟⲡⲟⲥ ⲛ̅ⲧⲉⲡⲗⲁⲛⲏ §ⲇⲓⲁ ⲧⲟⲩⲧⲟ ϥⲥⲏϩ <text:line-break/><text:span text:style-name="T1"> </text:span><text:span text:style-name="T2">(136/28) </text:span> ϩⲙ̅ ⲡⲟⲓⲏⲧⲏⲥ ϫⲉ §ⲟⲇⲩⲥⲥⲉⲩⲥ ⲛⲉϥϩⲙⲟⲟⲥ <text:line-break/><text:span text:style-name="T1"> </text:span><text:span text:style-name="T2">(136/29) </text:span> ϩⲓ ⲧⲙⲟⲩⲉ §ⲉϥⲣⲓⲙⲉ ⲁⲩⲱ ⲉϥⲗⲩⲡⲉⲓ ⲉϥⲕⲧⲟ <text:line-break/><text:span text:style-name="T1"> </text:span><text:span text:style-name="T2">(136/30) </text:span> ⲙ̅ⲡⲉϥϩⲟ §ⲉⲃⲟⲗ ⲛ̅ⲛ̅ϣⲁϫⲉ ⲛ̅ⲕⲁⲗⲩⲯⲱ <text:line-break/><text:span text:style-name="T1"> </text:span><text:span text:style-name="T2">(136/31) </text:span> ⲙⲛ̅ ⲛⲉⲥⲁⲡⲁⲧⲏ §ⲉϥⲉⲡⲓⲑⲩⲙⲉⲓ ⲉⲧⲣⲉϥⲛⲁⲩ <text:line-break/><text:span text:style-name="T1"> </text:span><text:span text:style-name="T2">(136/32) </text:span> ⲉⲡⲉϥϯⲙⲉ §ⲁⲩⲱ ⲉⲩⲕⲁⲡⲛⲟⲥ ⲉϥⲛⲛ̣[ⲏⲩ] ⲉ‐ <text:line-break/><text:soft-page-break/><text:span text:style-name="T1"> </text:span><text:span text:style-name="T2">(136/33) </text:span> ⲃⲟ’ⲗ §ⲙ̅ⲙ’ⲟϥ ⲁⲩⲱ ⲥⲁⲃⲏ[’ⲗ] ϫ̣[ⲉ ⲁϥϫⲓ §ⲛ̅ⲛⲟⲩ]ⲃⲟ‐ <text:line-break/><text:span text:style-name="T1"> </text:span><text:span text:style-name="T2">(136/34) </text:span> ⲏⲑⲉⲓⲁ ⲉⲃⲟ’ⲗ ϩⲛ̅ ⲧⲡⲉ §ⲛ[ⲉϥⲛⲁϣ]ⲕ̣ⲟ̣[ⲧϥ] ⲁ̣ⲛ <text:line-break/><text:span text:style-name="T1"> </text:span><text:span text:style-name="T2">(136/35) </text:span> ⲉⲡⲉϥϯⲙ’ⲉ ⲡⲁⲗⲓ’ⲛ ⲧⲕⲉϩ̣[ⲉⲗⲉ]ⲛ̣ⲏ̣ 〈 〉 ⲉⲥϫⲱ <text:line-break/><text:span text:style-name="T1"> </text:span><text:span text:style-name="T2">(136/36) </text:span> [ⲙ̅ⲙⲟⲥ ϫⲉ] §ⲡ̣ⲁ̣[ϩ]ⲏ’ⲧ ⲁϥⲕⲧⲟϥ ⲛ̣̅ⲧⲟⲟ’ⲧ ⲡⲁⲗⲓⲛ <text:line-break/><text:span text:style-name="T1"> </text:span><text:span text:style-name="T2">(137/1) </text:span> §ⲉⲉⲓⲟⲩⲱϣ ⲃⲱ’ⲕ ⲉⲡⲁⲏⲉⲓ ⲛⲉⲥⲁϣ ⲉϩⲟⲙ ⲅⲁ’ⲣ <text:line-break/><text:span text:style-name="T1"> </text:span><text:span text:style-name="T2">(137/2) </text:span> ⲉⲥϫⲱ ⲙ̅ⲙⲟⲥ ϫⲉ §ⲁⲫⲣⲟⲇⲓⲧⲏ ⲧⲉⲛⲧⲁϩⲣ̅ⲁ‐ <text:line-break/><text:span text:style-name="T1"> </text:span><text:span text:style-name="T2">(137/3) </text:span> ⲡ̣ⲁⲧⲁ ⲙ̅ⲙⲟⲉⲓ §ⲁⲥⲛ̅ⲧ̅ ⲉⲃⲟ’ⲗ ⲙ̅ⲡⲁϯⲙⲉ ⲧⲁϣⲣ̅‐ <text:line-break/><text:span text:style-name="T1"> </text:span><text:span text:style-name="T2">(137/4) </text:span> ⲟⲩⲟⲟⲧⲥ̅ §ⲁϩⲓⲕⲁⲁⲥ ⲛ̅ⲥⲱⲉⲓ ⲁⲩⲱ ⲡⲁϩⲁⲉⲓ <text:line-break/><text:span text:style-name="T1"> </text:span><text:span text:style-name="T2">(137/5) </text:span> ⲉⲧⲛⲁⲛⲟ’ⲩϥ §ⲣ̅ⲣⲙⲛ̅ϩⲏ’ⲧ ⲛ̅ⲁⲥⲉⲓⲉ §ϩⲟⲧⲁⲛ <text:line-break/><text:span text:style-name="T1"> </text:span><text:span text:style-name="T2">(137/6) </text:span> ⲅⲁⲣ ⲉⲣϣⲁⲛ ⲧⲯⲩⲭⲏ ⲕⲱ ⲛ̅ⲥⲱⲥ ⲙ̅ⲡⲉⲥϩⲁⲓ̈ <text:line-break/><text:span text:style-name="T1"> </text:span><text:span text:style-name="T2">(137/7) </text:span> ⲛ̅ⲧⲉⲗⲉⲓⲟⲥ ⲉⲧⲃⲉ ⲧⲁⲡⲁⲧⲏ ⲛ̅ⲧⲁⲫⲣⲟⲇⲉⲓⲧⲏ <text:line-break/><text:span text:style-name="T1"> </text:span><text:span text:style-name="T2">(137/8) </text:span> ⲧⲁⲉⲓ ⲉⲧϣⲟⲟ’ⲡ ϩⲙ̅ ⲡⲉϫⲡⲟ ⲙ̅ⲡⲉⲉⲓⲙⲁ ⲧⲟ‐ <text:line-break/><text:span text:style-name="T1"> </text:span><text:span text:style-name="T2">(137/9) </text:span> ⲧⲉ ⲥⲛⲁⲣ̅ⲃⲗⲁⲡⲧⲉⲥⲑⲁⲓ ⲉⲥϣⲁⲛⲁϣ ⲉϩⲟ’ⲙ <text:line-break/><text:span text:style-name="T1"> </text:span><text:span text:style-name="T2">(137/10) </text:span> ⲇⲉ ⲛ̅ⲥⲣ̅ⲙⲉⲧⲁⲛⲟⲉⲓ ⲥⲉⲛⲁⲕⲧⲟⲥ ⲉϩⲟⲩ’ⲛ ⲉⲡⲉⲥ‐ <text:line-break/><text:span text:style-name="T1"> </text:span><text:span text:style-name="T2">(137/11) </text:span> ⲏⲉⲓ §ⲕⲁⲓ ⲅⲁⲣ ⲡⲓⲥⲣⲁⲏ’ⲗ ⲙ̅ⲡⲟⲩϭⲛ̅ ⲡⲉϥϣⲓⲛⲉ <text:line-break/><text:span text:style-name="T1"> </text:span><text:span text:style-name="T2">(137/12) </text:span> ⲛ̅ϣⲟⲣ’ⲡ ⲉⲧⲣⲟⲩⲛ̅ⲧϥ̅ ⲉⲃⲟⲗ ϩⲙ̅ ⲡⲕⲁϩ ⲛ̅ⲕⲏⲙⲉ <text:line-break/><text:span text:style-name="T1"> </text:span><text:span text:style-name="T2">(137/13) </text:span> ϩⲙ̅ ⲡⲏⲉⲓ ⲛ̅ⲧⲙⲛ̅ⲧϩⲙϩ̅ⲁ̅ⲗ̅ ⲉⲓ ⲙⲏⲧⲓ ϫⲉ ’ⲁϥⲉ‐ <text:line-break/><text:span text:style-name="T1"> </text:span><text:span text:style-name="T2">(137/14) </text:span> ϣ ⲉϩⲟ’ⲙ ⲉϩⲣⲁⲓ̈ ⲉⲡⲛⲟⲩⲧⲉ ⲁϥⲣⲓⲙⲉ ⲙ̅ⲡⲗⲱϫϩ <text:line-break/><text:span text:style-name="T1"> </text:span><text:span text:style-name="T2">(137/15) </text:span> ⲛ̅ⲛⲉϥϩⲃⲏⲩⲉ ⲡⲁⲗⲓⲛ ϥⲥⲏϩ ϩⲛ̅ ⲙ̅ⲯⲁⲗⲙⲟⲥ <text:line-break/><text:span text:style-name="T1"> </text:span><text:span text:style-name="T2">(137/16) </text:span> ϫⲉ §ⲁⲉⲓϩⲓⲥⲉ ⲉⲙⲁⲧⲉ ϩⲙ̅ ⲡⲁⲁϣ ⲉϩⲟ’ⲙ §ϯⲛⲁ‐ <text:line-break/><text:span text:style-name="T1"> </text:span><text:span text:style-name="T2">(137/17) </text:span> ϫⲱⲕⲙ̅ ⲙ̅ⲡⲁϭⲗⲟϭ ⲙⲛ̅ ⲡⲁⲡⲣⲏϣ §ⲕⲁⲧⲁ ⲟ̣ⲩ‐ <text:line-break/><text:span text:style-name="T1"> </text:span><text:span text:style-name="T2">(137/18) </text:span> ϣⲏ ϩⲛ̅ ⲛⲁⲣⲙ̅ⲙⲉⲓⲏ ⲁϩⲓⲣ̅ ⲁⲥ §ϩⲣⲁⲓ̈ ϩⲛ̅ ⲛⲁϫ̣[ⲁ]‐ <text:line-break/><text:span text:style-name="T1"> </text:span><text:span text:style-name="T2">(137/19) </text:span> ϫⲉ ⲧⲏⲣⲟⲩ ⲥⲁϩⲉ §ⲧⲏⲩⲧⲛ̅ ⲉⲃⲟⲗ ⲙ̅ⲙⲟⲉⲓ ⲟ[ⲩ]‐ <text:line-break/><text:span text:style-name="T1"> </text:span><text:span text:style-name="T2">(137/20) </text:span> ⲟⲛ ⲛⲓ’ⲙ ⲉⲧⲣ̅ §ϩⲱ’ⲃ ⲉⲧⲁⲛⲟⲙⲓⲁ ϫⲉ ⲉⲓⲥ ⲡϫⲟ̣ <text:line-break/><text:span text:style-name="T1"> </text:span><text:span text:style-name="T2">(137/21) </text:span> ⲉⲓⲥ §ⲁϥⲥⲱⲧⲙ̅ ⲉⲡⲁϣⲕⲁ’ⲕ ⲙ̅ⲡⲁⲣⲓⲙⲉ ⲁⲩ‐ <text:line-break/><text:span text:style-name="T1"> </text:span><text:span text:style-name="T2">(137/22) </text:span> ⲱ §ⲁⲡϫⲟⲉⲓⲥ ⲥⲱⲧⲙ̅ ⲉⲡⲁⲥⲟⲡⲥ̅ §ⲉϣⲱⲡ[ⲉ] <text:line-break/><text:span text:style-name="T1"> </text:span><text:span text:style-name="T2">(137/23) </text:span> ⲧⲛⲁⲣ̅ⲙⲉⲧⲁⲛⲟⲉⲓ ⲛⲁⲙⲉ ⲡⲛⲟⲩⲧⲉ ⲛⲁ̣‐ <text:line-break/><text:span text:style-name="T1"> </text:span><text:span text:style-name="T2">(137/24) </text:span> ⲥⲱⲧⲙ̅ ⲉⲣⲟⲛ ⲡϩⲁⲣϣϩⲏ’ⲧ ⲁⲩⲱ ⲡⲁ ⲡⲛⲟϭ <text:line-break/><text:span text:style-name="T1"> </text:span><text:span text:style-name="T2">(137/25) </text:span> ⲛ̅ⲛⲁ † ⲛⲁⲉⲓ ⲉⲧⲉ ⲡⲱϥ ⲡⲉ ⲡⲉⲟⲟⲩ ϣⲁ ⲛⲓⲉ‐ <text:line-break/><text:span text:style-name="T1"> </text:span><text:span text:style-name="T2">(137/26) </text:span> ⲛⲉϩ ⲛ̅ⲉⲛⲉϩ ϩⲁⲙⲏⲛ <text:line-break/><text:span text:style-name="T1"> </text:span><text:span text:style-name="T2">(137/27) </text:span> ⲧⲉⲝⲏⲅⲏⲥⲓⲥ ⲉⲧⲃⲉ ⲧⲯⲩⲭⲏ </text:p>
      <text:p text:style-name="P3"/>
      <text:p text:style-name="P2"/>
      <text:p text:style-name="P1">( codex II ) The Book of Thomas the Contender</text:p>
      <text:p text:style-name="P2"><text:span text:style-name="T1"> </text:span><text:span text:style-name="T2">(138/1) </text:span> §ⲛ̅ϣⲁϫⲉ ⲉⲑⲏⲡ’ ⲛⲁⲓ̈ ⲉⲛⲧⲁϥϣⲁϫⲉ ⲙ̅ⲙⲁⲩ ⲛ̅ϭⲓ ⲡⲥⲱ̅ⲣ̅ ⲛ̅‐ <text:line-break/><text:span text:style-name="T1"> </text:span><text:span text:style-name="T2">(138/2) </text:span> ⲓ̈ⲟⲩⲇⲁⲥ ⲑⲱⲙⲁⲥ ⲛⲁⲓ̈ ⲉⲛⲧⲁⲓ̈ⲥⲁϩⲟⲩ’ ⲁⲛⲟⲕ ϩⲱⲱⲧ’ ⲙⲁ‐ <text:line-break/><text:span text:style-name="T1"> </text:span><text:span text:style-name="T2">(138/3) </text:span> ⲑⲁⲓⲁⲥ ⲛⲉⲉⲓⲙⲟⲟϣⲉ ⲉⲉⲓⲥⲱⲧⲙ̅ ⲉⲣⲟⲟⲩ ⲉⲩϣⲁϫⲉ ⲙⲛ̅ <text:line-break/><text:span text:style-name="T1"> </text:span><text:span text:style-name="T2">(138/4) </text:span> ⲛⲟⲩⲉⲣⲏⲩ §ⲡⲁϫⲉϥ ⲛ̅ϭⲓ ⲡⲥ̅ⲱ̅ⲣ̅ ϫⲉ ⲡⲥⲁⲛ ⲑⲱⲙⲁⲥ ϩⲱⲥ <text:line-break/><text:span text:style-name="T1"> </text:span><text:span text:style-name="T2">(138/5) </text:span> ⲉⲩⲛ̅ⲧⲁⲕ’ ⲙ̅ⲙⲁⲩ ⲛ̅ⲟⲩⲟⲉⲓϣ ϩⲙ̅ ⲡⲕⲟⲥⲙⲟⲥ ⲥⲱⲧⲙ̅ ⲉⲣⲟⲓ̈ <text:line-break/><text:span text:style-name="T1"> </text:span><text:span text:style-name="T2">(138/6) </text:span> ⲛ̅ⲧⲁϭⲱⲗⲡ’ ⲛⲁⲕ’ ⲉⲃⲟⲗ ⲉⲧⲃⲉ ⲛⲉⲛⲧⲁⲕ’ⲙⲉⲉⲩⲉ ⲉⲣⲟⲟⲩ <text:line-break/><text:span text:style-name="T1"> </text:span><text:span text:style-name="T2">(138/7) </text:span> ϩⲣⲁⲓ̈ ϩⲙ̅ ⲡⲉⲕ’ϩⲏⲧ’ §ⲉⲡⲉⲓ ⲇⲉ ⲁⲩϫⲟⲟⲥ ϫⲉ ⲛ̅ⲧⲟⲕ’ ⲡⲁ’‐ <text:line-break/><text:span text:style-name="T1"> </text:span><text:span text:style-name="T2">(138/8) </text:span> ⲥⲟⲉⲓϣ’ ⲁⲩⲱ ⲡⲁϣⲃⲣ̅ⲙ̅ⲙⲏⲉ’ ϩⲉ’ⲧϩⲱⲧⲕ̅ ⲛ̅ⲕⲙ̅ⲙⲉ <text:line-break/><text:span text:style-name="T1"> </text:span><text:span text:style-name="T2">(138/9) </text:span> ϫⲉ ⲛ̅ⲧⲕ ⲛⲓⲙ’ ⲁⲩⲱ ⲁⲕϣⲟⲟⲡ’ ⲛ̅ⲁϣ ⲛ̅ϩⲉ ⲏ ⲉⲕⲛⲁϣⲱ‐ <text:line-break/><text:span text:style-name="T1"> </text:span><text:span text:style-name="T2">(138/10) </text:span> ⲡⲉ ⲛ̅ⲛⲁϣ ⲛ̅ⲣⲏⲧⲉ ⲉⲡⲉⲓⲇⲏ ⲥⲉⲛⲁⲙⲟⲩⲧⲉ ⲉⲣⲟⲕ’ ϫⲉ ⲡⲁⲥⲟⲛ <text:line-break/><text:span text:style-name="T1"> </text:span><text:span text:style-name="T2">(138/11) </text:span> ⲡⲉⲧⲉⲥϣⲉ ⲁⲛ ⲡⲉ’ ⲉⲧⲣⲉⲕ’ϣⲱⲡⲉ ⲉⲕⲟ ⲛ̅ⲧⲁⲥⲟⲟⲩⲛ’ⲉ’ <text:line-break/><text:span text:style-name="T1"> </text:span><text:span text:style-name="T2">(138/12) </text:span> ⲉⲣⲟⲕ’ ⲙ̅ⲙⲓⲛ’ ⲙ̅ⲙⲟⲕ’ϩ ⲁⲩⲱ ϯⲥⲟⲟⲩⲛⲉ ϫⲉ ⲁⲕⲙ̅ⲙⲉ’ϩ <text:line-break/><text:span text:style-name="T1"> </text:span><text:span text:style-name="T2">(138/13) </text:span> ⲁⲕⲟⲩ ⲱ ⲅⲁⲣ ⲉⲕⲙ̅ⲙⲉ ⲙ̅ⲙⲟⲉⲓ ϫⲉ ⲁⲛⲟⲕ ⲡⲉ ⲡⲥⲟⲟⲩⲛ ⲛ̅ⲧⲙⲏⲉ <text:line-break/><text:span text:style-name="T1"> </text:span><text:span text:style-name="T2">(138/14) </text:span> ϩⲱⲥ ⲉⲕⲙⲟⲟϣⲉ ϭⲉ ⲛⲙ̅ⲙⲁⲉⲓ ⲕⲁⲛ ⲛ̅ⲧⲁⲕ’ ⲟⲩⲁⲧ’ⲥⲟⲟⲩⲛ’ <text:line-break/><text:span text:style-name="T1"> </text:span><text:span text:style-name="T2">(138/15) </text:span> ⲁⲕⲟⲩⲱ ⲉⲕⲥⲟⲟⲩⲛ’ⲉ ⲁⲩⲱ ⲥⲉⲛⲁⲙⲟⲩⲧⲉ ⲉⲣⲟⲕ’ ϫⲉ ⲡⲣⲉϥ’‐ <text:line-break/><text:span text:style-name="T1"> </text:span><text:span text:style-name="T2">(138/16) </text:span> ⲥⲟⲟⲩⲛ’ⲉ ⲉⲣⲟϥ’ ⲙ̅ⲙⲓⲛ’ ⲙ̅ⲙⲟϥ’ ϫⲉ ⲡⲉⲧⲉ ⲙ̅ⲡϥ’ⲥⲟⲩ‐ <text:line-break/><text:span text:style-name="T1"> </text:span><text:span text:style-name="T2">(138/17) </text:span> ⲱⲛϥ ⲅⲁⲣ’ ⲙ̅ⲡϥⲥⲟⲩⲱⲛ ⲗⲁⲁⲩ’ ⲡⲉⲛⲧⲁϥⲥⲟⲩⲱⲛϥ ⲇⲉ ⲟⲩ‐ <text:line-break/><text:span text:style-name="T1"> </text:span><text:span text:style-name="T2">(138/18) </text:span> ⲁⲁⲧϥ’ ⲁϥⲟⲩⲱ ⲟⲛ’ ⲉϥϫⲓ ⲥⲟⲟⲩⲛⲉ’ ⲁⲡⲃⲁⲑⲟⲥ ⲙ̅ⲡⲧⲏⲣϥ <text:line-break/><text:span text:style-name="T1"> </text:span><text:span text:style-name="T2">(138/19) </text:span> ⲉⲧⲃⲉ ⲡⲁⲓ̈ ϭⲉ ⲛ̅ⲧⲟⲕ’ ⲡⲁⲥⲟⲛ̅ ⲑⲱⲙⲁⲥ’ ⲁⲕⲛⲁⲩ ⲁⲡⲡⲉⲑⲏⲡ’ <text:line-break/><text:span text:style-name="T1"> </text:span><text:span text:style-name="T2">(138/20) </text:span> ⲉⲃⲟⲗ ϩⲛ̅ ⲣⲣⲱⲙⲉ ⲉⲧⲉ ⲡⲁⲓ̈ ⲡⲉ ⲉⲧⲟⲩϫⲓ ϫⲣⲟⲡ’ ⲉⲣⲟϥ’ ⲉⲛ’‐ <text:line-break/><text:span text:style-name="T1"> </text:span><text:span text:style-name="T2">(138/21) </text:span> ⲥⲉⲥⲟⲟⲩⲛ ⲁⲛ’ §ⲡⲁϫⲉϥ ⲇⲉ ⲛ̅ϭⲓ ⲑⲱⲙⲁⲥ’ ⲙ̅ⲡϫⲟⲉⲓⲥ ϫⲉ <text:line-break/><text:span text:style-name="T1"> </text:span><text:span text:style-name="T2">(138/22) </text:span> ⲉⲧ̣ⲃⲉ ⲡⲁⲉⲓ ϭⲉ ϯⲥⲟⲡⲥ̅ ⲙ̅ⲙⲟⲕ ϫⲉⲕⲁⲁⲥ ⲉⲕⲛⲁϫⲱ ⲛⲁⲓ̈ <text:line-break/><text:span text:style-name="T1"> </text:span><text:span text:style-name="T2">(138/23) </text:span> [ⲛ̅ⲛ]ⲉϯϣⲓⲛⲉ ⲙ̅ⲙⲟⲕ’ ⲉⲣⲟⲟⲩ’ ϩⲁ ⲑⲏ ⲛ̅ⲧⲉⲕ’ⲁⲛⲁⲗⲏⲙ̅ⲯⲓⲥ <text:line-break/><text:span text:style-name="T1"> </text:span><text:span text:style-name="T2">(138/24) </text:span> [ⲁⲩ]ⲱ ϩⲟⲧⲁⲛ’ ⲉⲉⲓϣⲁⲛ’ⲥⲱⲧⲙ̅ ⲉⲃⲟⲗ ϩⲓⲧⲟⲟⲧⲕ’ ϩⲁ ⲡⲣⲁ <text:line-break/><text:span text:style-name="T1"> </text:span><text:span text:style-name="T2">(138/25) </text:span> ⲛⲛ̣ⲉⲑⲏⲡ’ ⲧⲟⲧⲉ ⲟⲩⲛ̅ ϭⲟⲙ ⲙ̅ⲙⲟⲉⲓ ⲉϣⲁϫⲉ ⲉⲧⲃⲏ’‐ <text:line-break/><text:span text:style-name="T1"> </text:span><text:span text:style-name="T2">(138/26) </text:span> ⲧ[ⲟ]ⲩ ⲁⲩⲱ ⲥⲟⲩⲟⲛϩ ⲉⲃⲟⲗ ⲛⲁⲉⲓ ϫⲉ ⲧⲙⲏⲉ ⲥⲙⲟⲕϩ ⲁ’‐ <text:line-break/><text:span text:style-name="T1"> </text:span><text:span text:style-name="T2">(138/27) </text:span> ⲁ[ⲥ] ⲛ̅ⲛⲁϩⲣⲛ̅ ⲛ̅ⲣⲱⲙⲉ’ §ⲁϥ’ⲟⲩⲱϣⲃ̅ ⲛ̅ϭⲓ ⲡⲥ̅ⲱ̅ⲣ̅ ⲉϥϫⲱ ⲙ̅‐ <text:line-break/><text:span text:style-name="T1"> </text:span><text:span text:style-name="T2">(138/28) </text:span> ⲙ̣[ⲟ]ⲥ ϫⲉ ⲉϣⲡⲉ ⲛⲉⲧⲟⲩⲟⲛϩ ⲉⲃⲟⲗ ⲛⲏⲧⲛ̅ ⲥⲉϩⲏⲡ’ <text:line-break/><text:span text:style-name="T1"> </text:span><text:span text:style-name="T2">(138/29) </text:span> ⲛ̣̅[ⲛ]ⲁ̣ϩⲣⲛ̅ ⲧⲏⲛⲉ ⲛ̅ⲁϣ ⲛ̅ϩⲉ’ ⲉⲩⲛ̅ ϭⲁⲙ’ ⲙ̅ⲙⲱⲧⲛ̅ ⲁⲥⲱⲧⲙ̅ <text:line-break/><text:span text:style-name="T1"> </text:span><text:span text:style-name="T2">(138/30) </text:span> ⲁⲛⲉⲧⲉ ⲛ̅ⲥⲉⲟⲩⲟⲛϩ ⲉⲃⲟⲗ ⲁⲛ’ ⲉϣⲡⲉ ⲛ̅ϩⲃⲏⲩⲉ ⲛ̅ⲧⲙⲏⲉ <text:line-break/><text:span text:style-name="T1"> </text:span><text:span text:style-name="T2">(138/31) </text:span> ⲉⲧⲟⲩⲟⲛϩ ⲉⲃⲟⲗ ϩⲙ̅ ⲡⲕⲟⲥⲙⲟⲥ ⲥⲉⲙⲟⲕϩ ⲁⲧⲣⲉⲧⲛ̅ⲁ’‐ <text:line-break/><text:span text:style-name="T1"> </text:span><text:span text:style-name="T2">(138/32) </text:span> ⲁⲩ ⲉⲉⲓⲉ ⲡⲱⲥ ϭⲉ ⲉⲧⲉⲧⲛⲁⲉⲓⲣⲉ ⲛ̅ⲛⲁ ⲡⲙⲉⲅⲉⲑⲟⲥ ⲉⲧ’‐ <text:line-break/><text:span text:style-name="T1"> </text:span><text:span text:style-name="T2">(138/33) </text:span> ϫⲟⲥⲉ’ ⲁⲩⲱ ⲛⲁ ⲡⲡⲗⲏⲣⲱⲙⲁ ⲉⲧⲉ ⲛ̅ⲥⲉⲟⲩⲟⲛϩ ⲉⲃⲟⲗ <text:line-break/><text:span text:style-name="T1"> </text:span><text:span text:style-name="T2">(138/34) </text:span> ⲁⲛ’ ⲛ̅ⲛⲁϣ ϭⲉ ⲛ̅ϩⲉ ⲉⲩⲛⲁⲙⲟⲩⲧⲉ ⲉⲣⲱⲧⲛ̅ ϫⲉ ⲉⲣⲅⲁⲧⲏⲥ <text:line-break/><text:span text:style-name="T1"> </text:span><text:span text:style-name="T2">(138/35) </text:span> ⲉⲧⲃⲉ ⲡⲁⲓ̈ ⲛ̅ⲧⲱⲧⲛ̅ ϩⲉⲛⲥⲃⲟⲩⲉⲓ ⲁⲩⲱ ⲙ̅ⲡⲁⲧⲉⲧⲛϫⲓ ⲙ̅‐ <text:line-break/><text:span text:style-name="T1"> </text:span><text:span text:style-name="T2">(138/36) </text:span> ⲡⲙⲉⲅⲉⲑⲟⲥ ⲛ̅ⲧⲙ̅ⲛ̅ⲧⲧⲉⲗⲉⲓⲟⲥ §ⲁϥⲟⲩⲱϣ̅ⲃ̅ ⲇⲉ ⲛ̅ϭⲓ <text:line-break/><text:span text:style-name="T1"> </text:span><text:span text:style-name="T2">(138/37) </text:span> ⲑⲱⲙⲁⲥ ⲡⲉϫⲁϥ ⲙ̅ⲡⲥ̅ⲱ̅ⲣ̅ ϫⲉ ϫⲟⲥ ⲛⲁⲛ’ ⲉⲧⲃⲉ̣ [ⲛ]ⲁⲉⲓ <text:line-break/><text:span text:style-name="T1"> </text:span><text:span text:style-name="T2">(138/38) </text:span> ⲉⲧⲕϫⲱ ⲙ̅ⲙⲟⲟⲩ ϫⲉ ⲥⲉⲟⲩⲟⲛϩ ⲉⲃⲟⲗ ⲁⲛ’ ⲁ̣[ⲗⲗⲁ ⲥⲉ]ϩ̣ⲏⲡ’ <text:line-break/><text:span text:style-name="T1"> </text:span><text:span text:style-name="T2">(138/39) </text:span> ⲉⲣⲟⲛ’ §ⲡⲁϫⲉ ⲡⲥ̅ⲱ̅ⲣ̅ ϫⲉ ⲥⲱⲙⲁ [ⲛⲓ]ⲙ̣’ [.........]ⲛ̅ <text:line-break/><text:span text:style-name="T1"> </text:span><text:span text:style-name="T2">(138/40) </text:span> ⲛ̅ⲧⲃⲛⲟⲟⲩⲉ’ ⲉⲩϫⲡⲟ ⲙ̅ⲙⲟⲟⲩ .[.......].. .[..]ⲉ <text:line-break/><text:span text:style-name="T1"> </text:span><text:span text:style-name="T2">(138/41) </text:span> ⲉϥ[ⲟⲩ]ⲟⲛϩ ⲉ[ⲃ]ⲟⲗ ⲙ̅ⲡⲓⲣⲏⲧⲉ ⲛ̅ⲑⲉ ⲛ̣̅[...]ⲱ̣[.]ⲧ’ ⲉϥ’ⲥ̣ⲟⲩ‐ <text:line-break/><text:span text:style-name="T1"> </text:span><text:span text:style-name="T2">(138/42) </text:span> [..........]ⲧ̣ⲉ̣[...] ⲡⲁⲓ̈ ϩⲱⲱϥ’ ⲛⲉⲧⲙ̅ⲡⲥⲁ ⲛ’ⲧⲡⲉ <text:line-break/><text:span text:style-name="T1"> </text:span><text:span text:style-name="T2">(138/43) </text:span> [...............].ⲛⲉⲧⲟⲩⲟⲛϩ ⲉⲃⲟⲗ ⲁⲗⲗⲁ ⲉ[ⲩ]‐ <text:line-break/><text:span text:style-name="T1"> </text:span><text:span text:style-name="T2">(139/1) </text:span> ⲟ̣ⲛϩ ⲉⲃⲟⲗ ϩⲛ̅ ⲧⲟⲩⲛⲟⲩⲛⲉ ⲟⲩⲁⲁⲧⲟⲩ ⲁⲩⲱ ⲛⲉⲩⲕⲁⲣ‐ <text:line-break/><text:span text:style-name="T1"> </text:span><text:span text:style-name="T2">(139/2) </text:span> ⲡⲟⲥ ⲡⲉⲧ’ⲥⲁⲁⲛϣ ⲙ̅ⲙⲟⲟⲩ ⲛⲉⲉⲓⲥⲱⲙⲁ ⲛ̅ⲧⲟⲟⲩ ⲉⲧⲟⲩ‐ <text:line-break/><text:span text:style-name="T1"> </text:span><text:span text:style-name="T2">(139/3) </text:span> ⲟⲛϩ ⲉⲃⲟⲗ’ ⲉⲩⲱⲙ’ ⲉⲃⲟⲗ ϩⲛ̅ ⲛ̅ⲥⲱⲛⲧ’ ⲉϯⲛⲉ ⲙ̅ⲙⲟⲟⲩ <text:line-break/><text:soft-page-break/><text:span text:style-name="T1"> </text:span><text:span text:style-name="T2">(139/4) </text:span> ⲉⲧⲃⲉ ⲡⲁⲓ̈ ϭⲉ ⲛ̅ⲥⲱⲙⲁ ⲥⲉϣⲓⲃⲉ ⲡⲉⲧϣⲓⲃⲉ ⲁⲉ ϥⲛⲁⲧⲉ‐ <text:line-break/><text:span text:style-name="T1"> </text:span><text:span text:style-name="T2">(139/5) </text:span> ⲕⲟ ⲛ̅ϥⲱϫⲛ̅ ⲁⲩⲱ ⲙⲛ̅ⲧⲉϥ ϩⲉⲗⲡⲓⲥ ⲛ̅ⲱⲛϩ ϫⲙ̅ ⲡⲓⲛⲁⲩ <text:line-break/><text:span text:style-name="T1"> </text:span><text:span text:style-name="T2">(139/6) </text:span> ϫⲉ ⲡⲓⲥⲱⲙⲁ ⲅⲁⲣ’ ⲟⲩⲧⲃ̅ⲛⲏ ⲡⲉ ⲛ̅ⲛ̅ⲑⲉ ϭⲉ ⲛ̅ⲛ̅ⲧⲃⲛⲟⲟⲩⲉ’ <text:line-break/><text:span text:style-name="T1"> </text:span><text:span text:style-name="T2">(139/7) </text:span> ⲉϣⲁⲣⲉ ⲡⲟⲩⲥⲱⲙⲁ’ ⲧⲉⲕⲟ ⲧⲉⲉⲓ ⲧⲉ ⲑⲉ ⲛ̅ⲛⲉⲉⲓⲡⲗⲁⲥⲙⲁ’ <text:line-break/><text:span text:style-name="T1"> </text:span><text:span text:style-name="T2">(139/8) </text:span> ⲥⲉⲛⲁⲧⲉⲕⲟ’ ⲙⲏⲧⲓ ⲟⲩⲉⲃⲟⲗ ⲁⲛ ⲡⲉ ϩⲛ̅ ⲧⲥⲩⲛⲟⲩⲥⲓⲁ ⲛ̅‐ <text:line-break/><text:span text:style-name="T1"> </text:span><text:span text:style-name="T2">(139/9) </text:span> ⲑⲉ ⲙ̅ⲡⲁ ⲛ̅ⲧⲃ̅ⲛⲟⲟⲩⲉ’ ⲉϣϫⲉ ⲟⲩⲉⲃⲟⲗ ⲛ̅ϩⲏⲧⲥ̅ ϩⲱ‐ <text:line-break/><text:span text:style-name="T1"> </text:span><text:span text:style-name="T2">(139/10) </text:span> ⲱϥ ⲡⲉ ⲛ̅ⲁϣ ⲛ̅ϩⲉ ⲉϥⲛⲁϫⲡⲟ ⲛ̅ⲟⲩⲇⲓⲁⲫⲟⲣⲁ ⲛ̅ϩⲟⲩⲟ <text:line-break/><text:span text:style-name="T1"> </text:span><text:span text:style-name="T2">(139/11) </text:span> ⲉⲣⲟⲟⲩ ⲉⲧⲃⲉ ⲡⲁⲓ̈ ϭⲉ ⲛ̅ⲧⲱⲧⲛ̅ ϩⲉⲛⲕⲟⲩⲉⲓ ϣⲁⲛⲧⲉ‐ <text:line-break/><text:span text:style-name="T1"> </text:span><text:span text:style-name="T2">(139/12) </text:span> ⲧⲛ̅ⲣ̅ ⲧⲉⲗⲉⲓⲟⲥ’ §ⲁϥⲟⲩⲱϣⲃ̅ ⲇⲉ ⲛ̅ϭⲓ ⲑⲱⲙⲁⲥ ϫⲉ ⲉ‐ <text:line-break/><text:span text:style-name="T1"> </text:span><text:span text:style-name="T2">(139/13) </text:span> ⲧⲃⲉ ⲡⲁⲓ̈ ϯϫⲱ ⲙ̅ⲙⲟⲥ ⲛⲁⲕ’ ⲡϫⲟⲉⲓⲥ̣ ϫⲉ ⲛⲉⲧϣⲁϫⲉ <text:line-break/><text:span text:style-name="T1"> </text:span><text:span text:style-name="T2">(139/14) </text:span> ⲉⲧⲃⲉ ⲛⲉⲧⲉ ⲛ̅ⲥⲉⲟⲩⲟⲛϩ ⲉⲃⲟⲕ ⲁⲛ’ ⲁⲩⲱ ⲛⲉⲧ’ⲙⲟⲕϩ <text:line-break/><text:span text:style-name="T1"> </text:span><text:span text:style-name="T2">(139/15) </text:span> ⲛ̅ⲃⲟⲗⲟⲩ ⲉⲩⲧⲛ̅ⲧⲱⲛ ⲁⲛⲉⲧϫⲱⲗⲕ’ ⲛ̅ⲛⲉⲩⲥⲁⲧⲉ ⲁⲩ‐ <text:line-break/><text:span text:style-name="T1"> </text:span><text:span text:style-name="T2">(139/16) </text:span> ⲙⲏⲓ̈ⲛⲉ ϩⲛ̅ ⲧⲟⲩϣⲏ ⲥⲉϫⲱⲗⲕ’ ⲙⲉⲛ ⲛ̅ⲛⲉⲩⲥⲟⲧⲉ ⲛ̅ⲑⲉ <text:line-break/><text:span text:style-name="T1"> </text:span><text:span text:style-name="T2">(139/17) </text:span> ⲛ̅ϩⲟⲉⲓⲛⲉ ϫⲉ ⲉⲩϫⲱⲗⲕ’ ⲁⲡⲙⲁⲓ̈ⲛⲉ’ ⲁⲗⲗⲁ ϥⲟⲩⲟⲛϩ <text:line-break/><text:span text:style-name="T1"> </text:span><text:span text:style-name="T2">(139/18) </text:span> ⲉⲃⲟⲗ ⲁⲛ’ ϩⲟⲧⲁⲛ ⲇⲉ ⲉⲣϣⲁⲛ ⲡⲟⲩⲟⲉⲓⲛ’ ⲉⲓ ⲉⲃⲟⲗ ⲛ̅ϥ’‐ <text:line-break/><text:span text:style-name="T1"> </text:span><text:span text:style-name="T2">(139/19) </text:span> ϩⲱ’ ⲙ̅ⲡⲕⲁⲕⲉ ⲧⲟⲧⲉ ⲡϩⲱⲃ ⲙ̅ⲡⲟⲩⲁ ⲡⲟⲩⲁ ⲛⲁⲟⲩⲱⲛϩ <text:line-break/><text:span text:style-name="T1"> </text:span><text:span text:style-name="T2">(139/20) </text:span> ⲉⲃⲟⲗ’ ⲛ̅ⲧⲟⲕ’ ⲇⲉ ⲡⲛ̅ⲟⲩⲟⲉⲓⲛ’ ⲉⲕⲣ̅ ⲟⲩⲟⲉⲓⲛ ⲡϫⲟⲉⲓⲥ’ <text:line-break/><text:span text:style-name="T1"> </text:span><text:span text:style-name="T2">(139/21) </text:span> §ⲡⲁϫⲉϥ ⲛ̅ϭⲓ ⲓ̅ⲥ̅ ϫⲉ ⲡⲟⲩⲟⲉⲓⲛ’ ⲉϥϣⲟⲟⲡ’ ϩⲙ̅ ⲡⲟⲩ[ⲟ]‐ <text:line-break/><text:span text:style-name="T1"> </text:span><text:span text:style-name="T2">(139/22) </text:span> ⲉⲓ’ⲛ §ⲡⲁϫ’ⲉϥ ⲛ̅ϭⲓ ⲑⲱⲙⲁ’ⲥ ⲉϥϫⲱ ⲙ̅ⲙⲟ’ⲥ ϫⲉ ⲡϫⲟ̣[ⲉⲓⲥ] <text:line-break/><text:span text:style-name="T1"> </text:span><text:span text:style-name="T2">(139/23) </text:span> ⲉⲧⲃⲉ ⲟⲩ ⲡⲓⲟⲩⲟⲉⲓ’ⲛ ⲉⲧⲟⲩⲟⲛϩ ⲉⲃⲟⲗ ⲉⲧⲣ̅ ⲟⲩⲟⲉⲓⲛ̣ <text:line-break/><text:span text:style-name="T1"> </text:span><text:span text:style-name="T2">(139/24) </text:span> ⲉⲧⲃⲉ ⲛ̅ⲣⲱⲙ’ⲉ ϣⲁϥⲡⲣ̅ⲣ̅ⲓⲉ ⲁⲩⲱ ϣⲁϥϩⲱⲧ’ⲡ §ⲡⲁϫ’ⲉϥ <text:line-break/><text:span text:style-name="T1"> </text:span><text:span text:style-name="T2">(139/25) </text:span> ⲛ̅ϭⲓ ⲡⲥ̅ⲱ̅ⲣ̅ ϫⲉ ⲱ ⲡⲙⲁⲕⲁⲣⲓⲟⲥ ⲑⲱⲙⲁⲥ ⲡⲓⲟⲩⲟⲉⲓⲛ ⲅ̣[ⲁ]ⲣ <text:line-break/><text:span text:style-name="T1"> </text:span><text:span text:style-name="T2">(139/26) </text:span> ⲉⲧⲟⲩⲟⲛϩ ⲉⲃⲟⲗ ⲁϥⲣ̅ ⲟⲩⲟⲉⲓⲛⲉ ⲉⲧⲃⲉ ⲧⲏⲛⲉ ϫⲉⲕⲁ[ⲁⲥ] <text:line-break/><text:span text:style-name="T1"> </text:span><text:span text:style-name="T2">(139/27) </text:span> ⲁⲛ ⲉⲧⲉⲧⲛⲁϭⲱ ⲙ̅ⲡⲓⲙ’ⲁ ⲁⲗⲗⲁ ϫⲉ ⲉⲧⲉⲧⲛⲁⲉⲓ ⲉⲃ̣[ⲟⲗ] <text:line-break/><text:span text:style-name="T1"> </text:span><text:span text:style-name="T2">(139/28) </text:span> ⲛ̅ϩⲏ’ⲧϥ ϩⲟⲧⲁⲛ ⲇⲉ ⲉⲣⲉϣⲁ ⲛ̅ⲥⲱⲧ’ⲡ ⲧⲏⲣⲟⲩ ⲕⲱ̣ [ⲉ]ϩ‐ <text:line-break/><text:span text:style-name="T1"> </text:span><text:span text:style-name="T2">(139/29) </text:span> ⲣⲁⲓ̈ ⲛ̅ϯⲙ̅ⲛ̅ⲧⲧⲃ̅ⲛ’ⲏ ⲧⲟⲧⲉ ⲡⲓⲟⲩⲟⲉⲓⲛ ϥⲛⲁⲣ̅ⲁⲛⲁ‐ <text:line-break/><text:span text:style-name="T1"> </text:span><text:span text:style-name="T2">(139/30) </text:span> ⲭⲱⲣⲉⲓ ⲉϩⲣⲁⲓ̈ ⲉⲧ’ⲉϥⲟⲩⲥⲓⲁ ⲁⲩⲱ ⲧ’ⲉϥⲟⲩⲥⲓⲁ ⲛⲁϣⲟ’ⲡϥ <text:line-break/><text:span text:style-name="T1"> </text:span><text:span text:style-name="T2">(139/31) </text:span> ⲉⲣⲟⲥ ϫⲉ ⲟⲩϩⲩⲡⲏⲣⲉⲧⲏⲥ ⲉⲛⲁⲛⲟ’ⲩϥ ⲡⲉ §ⲧⲟⲧⲉ <text:line-break/><text:span text:style-name="T1"> </text:span><text:span text:style-name="T2">(139/32) </text:span> ⲁϥⲟⲩⲱϩ ⲉⲧⲟⲟ’ⲧϥ ⲛ̅ϭⲓ ⲡⲥⲱ̅ⲣ̅ ⲡⲁϫ’ⲉϥ ϫⲉ ⲱ͂ ⲧⲉⲧⲉ <text:line-break/><text:span text:style-name="T1"> </text:span><text:span text:style-name="T2">(139/33) </text:span> ⲙⲁⲩϣⲛ̅ ⲣⲁⲧⲥ̅ ⲧⲁⲅⲁⲡⲏ ⲙ̅ⲡⲟⲩⲟⲉⲓ’ⲛ ⲱ͂ ⲡⲥⲓϣⲉ ⲙ̅‐ <text:line-break/><text:span text:style-name="T1"> </text:span><text:span text:style-name="T2">(139/34) </text:span> ⲡⲕⲱϩ’ⲧ ⲉⲧϫⲉⲣⲟ ϩⲣⲁⲓ̈ ϩⲛ̅ ⲛ̅ⲥⲱⲙⲁ ⲛ̅ⲛ̅ⲣⲱⲙⲉ ⲙⲛ̅ <text:line-break/><text:span text:style-name="T1"> </text:span><text:span text:style-name="T2">(139/35) </text:span> ⲛⲉⲩⲁⲧⲕⲁ’ⲥ ⲉϥϫⲉⲣⲟ ϩⲣⲁⲓ̈ ⲛ̅ϩⲏⲧⲟⲩ ⲛ̅ⲧⲟⲩϣⲏ ⲙⲛ̅ <text:line-break/><text:span text:style-name="T1"> </text:span><text:span text:style-name="T2">(139/36) </text:span> ⲫ[ⲟⲟⲩ] ⲁⲩⲱ ⲉⲧⲣⲱⲭϩ ⲛ̅ⲙ̅ⲙⲉⲗⲟⲥ ⲛ̅ⲛ̅ⲣⲱⲙ’ⲉ ⲁⲩⲱ <text:line-break/><text:span text:style-name="T1"> </text:span><text:span text:style-name="T2">(139/37) </text:span> ⲉ[ⲧⲧⲣⲉ ⲛ]ⲉⲩϩⲏⲧ ϯϩ’ⲉ ⲁⲩⲱ ⲛⲉⲩⲯⲩⲭⲏ ⲉⲥⲧⲣⲟⲩⲡⲱϣⲥ̅ <text:line-break/><text:span text:style-name="T1"> </text:span><text:span text:style-name="T2">(139/38) </text:span> ⲁ[........] ⲉ̣ⲣ̣[ⲟ]ⲟⲩ ϩⲣⲁⲓ̈ ϩⲛ̅ ⲛ̅ϩⲟⲩ’ⲧ ⲙⲛ̅ ⲛ̅ⲥϩⲓⲟⲙ̣ⲉ <text:line-break/><text:span text:style-name="T1"> </text:span><text:span text:style-name="T2">(139/39) </text:span> [.].ⲉϩ.[....ⲧⲟ]ⲩ̣ϣⲏ ⲁⲩⲱ ⲉⲧⲕⲓ’ⲙ ⲉⲣⲟⲟⲩ [ϩⲛ̅] ⲟⲩ‐ <text:line-break/><text:span text:style-name="T1"> </text:span><text:span text:style-name="T2">(139/40) </text:span> [..]’ⲙ ⲉϥ[...ϩ]ⲛ̅ ⲟⲩϩⲱ’ⲡ ⲙⲛ̅ ⲟⲩⲱ̣ⲛ̣ϩ ⲉⲃⲟ[ⲗ ⲥⲉ]‐ <text:line-break/><text:span text:style-name="T1"> </text:span><text:span text:style-name="T2">(139/41) </text:span> [ⲕⲓ]ⲙ ⲅⲁ’ⲣ ⲛ̣̅ϭⲓ ⲛ̅ϩⲟⲟⲩ’ⲧ ⲥ[...ⲁϫⲛ̅ ⲛ̅ⲥϩⲓⲟ]‐ <text:line-break/><text:span text:style-name="T1"> </text:span><text:span text:style-name="T2">(139/42) </text:span> ⲙ̣’ⲉ ⲁⲩⲱ ⲛ̅ⲥϩⲓⲟⲙ’ⲉ ’ⲁϫⲛ̅ ⲛ̅ϩⲟⲟⲩⲧ ⲉⲧⲃⲉ ⲡⲁⲓ̈ ⲥⲉ] <text:line-break/><text:span text:style-name="T1"> </text:span><text:span text:style-name="T2">(140/1) </text:span> ϫⲱ ⲙ̅ⲙⲟⲥ ϫⲉ ⲟⲩⲟⲛ ⲛⲓ’ⲙ ⲉⲧϣⲓⲛⲉ ⲛ̅ⲥⲁ ⲧⲙⲏⲉ ⲉⲃⲟⲗ <text:line-break/><text:span text:style-name="T1"> </text:span><text:span text:style-name="T2">(140/2) </text:span> ϩⲛ̅ ⲧⲥⲁⲃⲏ ⲙ̅ⲙⲏⲉ ϥⲛⲁⲥⲙⲓⲛⲉ ⲛ’ⲁϥ ⲛ̅ϩⲉⲛⲧⲛ̅ϩ ⲁⲧⲣ’ⲉϥ‐ <text:line-break/><text:span text:style-name="T1"> </text:span><text:span text:style-name="T2">(140/3) </text:span> ϩⲱ’ⲗ ⲉϥⲡⲏ’ⲧ ϩⲏⲧⲥ̅ ⲛ̅ⲧⲉⲡⲓⲑⲩⲙⲓⲁ ⲉⲧⲣⲱⲕ ⲛⲙ̅ⲡⲛ̅ⲁ̅ <text:line-break/><text:span text:style-name="T1"> </text:span><text:span text:style-name="T2">(140/4) </text:span> ⲛ̅ⲛ̅ⲣⲱⲙ’ⲉ ⲁⲩⲱ ϥⲛⲁⲥⲙⲓⲛⲉ ⲛ’ⲁϥ ⲛ̅ϩⲉⲛⲧⲛϩ ⲉϥⲡⲱ’ⲧ <text:line-break/><text:span text:style-name="T1"> </text:span><text:span text:style-name="T2">(140/5) </text:span> ϩⲏ’ⲧϥ ⲙ̅ⲡⲛ̅ⲁ̅ ⲛⲓ’ⲙ ⲉⲧⲟⲩⲟⲛϩ ⲉⲃⲟ’ⲗ §ⲁϥⲟⲩⲱϣⲃ̅ ⲛ̅ϭⲓ <text:line-break/><text:span text:style-name="T1"> </text:span><text:span text:style-name="T2">(140/6) </text:span> ⲑⲱⲙⲁ’ⲥ ⲉϥϫⲱ ⲙ̅ⲙⲟ’ⲥ ϫⲉ ⲡϫⲟⲉⲓ’ⲥ ⲡⲁⲓ̈ ⲣⲱ ⲡⲉϯϩϣⲓ‐ <text:line-break/><text:span text:style-name="T1"> </text:span><text:span text:style-name="T2">(140/7) </text:span> ⲛⲉ ⲙ̅ⲙⲟ’ⲕ ⲉⲧⲃⲏ’ⲧϥ ϩⲱⲥ ⲉⲡⲓⲇⲏ ⲁⲉⲓⲙ̅ⲙⲉ ϫⲉ ⲛ̅ⲧⲟ’ⲕ <text:line-break/><text:span text:style-name="T1"> </text:span><text:span text:style-name="T2">(140/8) </text:span> ⲡⲉⲧⲣ̅ ⲛⲟϥⲣⲉ ⲛⲁ’ⲛ ⲕⲁⲧⲁ ⲑⲉ ⲉⲧⲕϫⲱ ⲙ̅ⲙⲟⲥ §ⲡⲁⲗⲓⲛ ’ⲁϥ‐ <text:line-break/><text:soft-page-break/><text:span text:style-name="T1"> </text:span><text:span text:style-name="T2">(140/9) </text:span> ⲟⲩⲱϣⲃ̅ ⲛ̅ϭⲓ ⲡⲥⲱ̅ⲣ̅ ⲡⲉϫⲁϥ ϫⲉ ⲉⲧⲃⲉ ⲡⲁⲓ̈ ⲟⲩⲁⲛⲁⲅⲕⲏ <text:line-break/><text:span text:style-name="T1"> </text:span><text:span text:style-name="T2">(140/10) </text:span> ⲉⲣⲟⲛ ⲧⲉ ⲁϫⲟⲟⲥ ⲛⲏⲧⲛ̅ ϫⲉ ⲧⲁⲉⲓ ⲅⲁⲣ ⲧⲉ ⲧⲉⲥⲃⲱ ⲛ̅ⲛ̅ⲧⲉ‐ <text:line-break/><text:span text:style-name="T1"> </text:span><text:span text:style-name="T2">(140/11) </text:span> ⲗⲉⲓⲟⲥ ⲉϣⲡⲉ ⲧⲉⲧⲛ̅ⲟⲩⲱϣⲉ ϭ’ⲉ ⲁⲣ̅ ⲧⲉⲗⲉⲓⲟ’ⲥ ⲧⲉⲧⲛⲁ‐ <text:line-break/><text:span text:style-name="T1"> </text:span><text:span text:style-name="T2">(140/12) </text:span> ⲁⲣⲉϩ ⲁⲛⲁⲉ’ⲓ ⲉϣⲱⲡⲉ ⲙ̅ⲙⲟ’ⲛ ⲡⲉⲧⲛ̅ⲣⲁⲛ ⲡⲉ ⲁⲧⲥⲃ’ⲱ <text:line-break/><text:span text:style-name="T1"> </text:span><text:span text:style-name="T2">(140/13) </text:span> ⲉⲡⲓⲇⲏ ⲙⲛ̅ ϣϭⲟ’ⲙ ⲛ̅ⲧⲉ ⲟⲩⲣⲙⲛ̅ϩⲏ’ⲧ ⲑⲩⲱϩ ⲙⲛ̅ ⲟ’ⲩ‐ <text:line-break/><text:span text:style-name="T1"> </text:span><text:span text:style-name="T2">(140/14) </text:span> ⲥⲟϭ ⲡⲣⲙⲛ̅ϩⲏ’ⲧ ⲅⲁ’ⲣ ϥϫⲏ’ⲕ ⲉⲃⲟⲗ ⲛ̅ⲥⲱⲫⲓⲁ ⲛⲓ’ⲙ <text:line-break/><text:span text:style-name="T1"> </text:span><text:span text:style-name="T2">(140/15) </text:span> ⲡⲥⲟϭ ⲛ̅ⲧ’ⲟϥ ⲡⲡⲉⲧⲛⲁⲛⲟⲩϥ ⲡⲡⲉⲑⲟⲟⲩ ⲡⲓϣⲱϣ <text:line-break/><text:span text:style-name="T1"> </text:span><text:span text:style-name="T2">(140/16) </text:span> ⲛ̅ⲟⲩⲱ’ⲧ ⲛ’ⲁϥ ⲡⲉ ϫⲉ ⲡⲥⲟⲫⲟⲥ ⲅⲁ’ⲣ ϥⲛⲁⲥⲁⲁⲛϣ ϩⲛ̅ <text:line-break/><text:span text:style-name="T1"> </text:span><text:span text:style-name="T2">(140/17) </text:span> ⲧⲙⲏⲉ ⲁⲩⲱ ϥⲛⲁϣⲱⲡⲉ ⲛ̅ⲑⲉ ⲙ̅ⲡϣⲏⲛ ⲉⲧⲣⲏ’ⲧ ϩⲓ‐ <text:line-break/><text:span text:style-name="T1"> </text:span><text:span text:style-name="T2">(140/18) </text:span> ϫⲛ̅ ⲡⲙⲟⲩ ⲛ̅ⲥⲱⲣ’ⲙ ⲉⲡⲓⲇⲏ ⲟⲩⲛ ϩⲟⲉⲓⲛⲉ ⲉⲩⲛ̅ⲧⲛ̅ϩ̅ <text:line-break/><text:span text:style-name="T1"> </text:span><text:span text:style-name="T2">(140/19) </text:span> ⲙ̅ⲙⲟⲟⲩ ⲉⲩⲡⲱ’ⲧ ϩⲓϫⲛ̅ ⲛⲉⲧⲟⲩⲟⲛϩ ⲉⲃⲟⲗ ⲛⲁⲉⲓ ⲉ‐ <text:line-break/><text:span text:style-name="T1"> </text:span><text:span text:style-name="T2">(140/20) </text:span> ⲧⲟⲩⲏⲩ ⲉⲃⲟⲗ ϩⲛ̅ ⲧⲙⲏ’ⲉ ⲡⲉⲧϫⲓ ⲙⲟⲉⲓ’ⲧ ⲅⲁⲣ ϩⲏⲧⲟ’ⲩ <text:line-break/><text:span text:style-name="T1"> </text:span><text:span text:style-name="T2">(140/21) </text:span> ⲉ̣[ⲧ]ⲉ ⲡⲕⲱϩⲧ ⲡ’ⲉ ϥⲛⲁϯ ⲛⲁⲩ ⲛ̅ⲟⲩⲫⲁⲛⲧⲁⲥⲓⲁ ⲙ̅ⲙⲏⲉ <text:line-break/><text:span text:style-name="T1"> </text:span><text:span text:style-name="T2">(140/22) </text:span> [ⲁⲩ]ⲱ̣ ϥⲛⲁⲣ̅ ⲟⲩⲟⲉⲓⲛ ⲉⲣⲟⲟⲩ ϩⲛ̅ ⲟⲩⲥⲁⲉⲓⲉ ⲉϥⲛⲁⲧⲉ‐ <text:line-break/><text:span text:style-name="T1"> </text:span><text:span text:style-name="T2">(140/23) </text:span> [ⲕⲟ] ⲁⲩⲱ ϥⲛⲁⲣ̅ⲁⲓⲭⲙⲁⲗⲱⲧⲓⲍⲉ ⲙ̅ⲙⲟⲟ’ⲩ ϩⲛ̅ ⲟⲩϩⲗ̅‐ <text:line-break/><text:span text:style-name="T1"> </text:span><text:span text:style-name="T2">(140/24) </text:span> ϭⲉ ⲛ̅ⲕⲁⲕ’ⲉ ⲛ̅ϥⲧⲟⲣⲡⲟⲩ ϩⲛ̅ ⲟⲩϩⲏⲇⲟⲛⲏ ⲉⲥϯ ⲥⲧⲟⲉⲓ <text:line-break/><text:span text:style-name="T1"> </text:span><text:span text:style-name="T2">(140/25) </text:span> ⲁⲩⲱ ϥⲛⲁⲁⲩ ⲛ̅ⲃⲗ̅ⲗⲉ ϩⲣⲁⲓ̈ ϩⲛ̅ ⲧⲉⲡⲓⲑⲩⲙⲓⲁ ⲛ̅ⲁⲧⲥⲉⲓ <text:line-break/><text:span text:style-name="T1"> </text:span><text:span text:style-name="T2">(140/26) </text:span> ⲁ̣ⲩ̣ⲱ ϥⲛⲁϫⲁϥϫϥ̅ ⲛ̅ⲛⲉⲩⲯⲩⲭⲟⲟⲩ’ⲉ ⲁⲩⲱ ⲛ̅ϥϣⲱ‐ <text:line-break/><text:span text:style-name="T1"> </text:span><text:span text:style-name="T2">(140/27) </text:span> [ⲡⲉ] ⲛⲁⲩ ⲛ̅ⲑⲉ ⲛ̅ⲛⲟⲩϣⲙⲟⲩ’ⲉ ⲉⲥⲧⲁⲕⲥ̅ ϩⲙ̅ ⲡⲟⲩϩⲏ’ⲧ <text:line-break/><text:span text:style-name="T1"> </text:span><text:span text:style-name="T2">(140/28) </text:span> ⲉ̣[ⲙ]ⲛ̅ ϣϭⲟ’ⲙ ⲙ̅ⲙⲟⲟⲩ ⲛ̅ⲛⲁϩⲥ̅ ⲉⲛⲉϩ ⲁⲩⲱ ⲛ̅ⲑⲉ ⲛ̅‐ <text:line-break/><text:span text:style-name="T1"> </text:span><text:span text:style-name="T2">(140/29) </text:span> ⲟ̣ⲩⲭⲁⲗⲓⲛⲟⲥ ϩⲛ̅ ⲟⲩⲧⲁⲡⲣⲟ ⲉϥⲥⲱ’ⲕ ⲙ̅ⲙⲟⲟⲩ ⲁⲡ’ⲉϥ‐ <text:line-break/><text:span text:style-name="T1"> </text:span><text:span text:style-name="T2">(140/30) </text:span> ⲟⲩⲱϣ’ⲉ ⲙ̅ⲙⲓ’ⲛ ⲙ̅ⲙ’ⲟϥ §ⲁⲩⲱ ⲁϥⲙⲟⲣⲟⲩ ϩⲛ̅ ⲛ’ⲉϥ‐ <text:line-break/><text:span text:style-name="T1"> </text:span><text:span text:style-name="T2">(140/31) </text:span> ⲁⲗⲩⲥⲓ’ⲥ ⲁⲩⲱ ⲛⲉⲩⲙⲉⲗⲟⲥ ⲧⲏⲣⲟⲩ ⲁϥⲥⲟⲛϩⲟⲩ ⲛ̅‐ <text:line-break/><text:span text:style-name="T1"> </text:span><text:span text:style-name="T2">(140/32) </text:span> ϩⲣⲁⲓ̈ ϩⲙ̅ ⲡⲥⲓϣ’ⲉ ⲛ̅ⲧⲙⲣ̅ⲣⲉ ⲛ̅ⲧⲉⲡⲓⲑⲩⲙⲉⲓ’ⲁ ⲛ̅ⲛⲁⲉⲓ <text:line-break/><text:span text:style-name="T1"> </text:span><text:span text:style-name="T2">(140/33) </text:span> ⲉⲧⲟⲩⲟⲛϩ ⲉⲃⲟⲗ ⲉⲧⲛⲁⲧⲉⲕⲟ ⲁⲩⲱ ⲉⲧⲛⲁϣⲓⲃⲉ <text:line-break/><text:span text:style-name="T1"> </text:span><text:span text:style-name="T2">(140/34) </text:span> ⲁⲩⲱ ⲉⲧⲛⲁⲡⲱⲛⲉ ⲕⲁⲧⲁ ⲡⲥⲱ’ⲕ ⲛ̅ⲧⲁⲩⲥⲟⲕⲟ’ⲩ <text:line-break/><text:span text:style-name="T1"> </text:span><text:span text:style-name="T2">(140/35) </text:span> ⲛ̅ⲧⲡⲉ ⲁⲡⲓⲧⲛ̅ ⲛ̅ⲟⲩⲟⲉⲓϣ ⲛⲓ’ⲙ ⲉⲩϩⲱⲧⲃ̅ ⲙ̅ⲙⲟⲟⲩ <text:line-break/><text:span text:style-name="T1"> </text:span><text:span text:style-name="T2">(140/36) </text:span> ⲉⲩⲥⲱⲕ ⲙ̅ⲙⲟⲟⲩ ϩⲓϫⲛ̅ ⲛ̅ⲧⲃ̅ⲛⲟⲟⲩ’ⲉ ⲧⲏⲣⲟⲩ̣ ⲙ̣̅ⲡ‐ <text:line-break/><text:span text:style-name="T1"> </text:span><text:span text:style-name="T2">(140/37) </text:span> ϫⲱϩⲙ̅ §’ⲁϥⲟⲩⲱϣⲃ̅ ⲛ̅ϭⲓ ⲑⲱⲙⲁⲥ ⲡⲁϫ[ⲉϥ ϫⲉ] ϥ’̣‐ <text:line-break/><text:span text:style-name="T1"> </text:span><text:span text:style-name="T2">(140/38) </text:span> ⲟⲩⲟⲛϩ ⲉⲃⲟ’ⲗ ⲁⲩⲱ ⲁⲩϫⲟⲟ[ⲥ] ϫⲉ ϩ[ⲁϩ]’ [ⲛⲉⲧ..]’ <text:line-break/><text:span text:style-name="T1"> </text:span><text:span text:style-name="T2">(140/39) </text:span> ⲉ[..] ⲛ̅ⲛⲉⲧⲉ ⲛ̅ⲥⲉⲥⲟⲟⲩⲛ ⲁ[ⲛ.....]..[..] <text:line-break/><text:span text:style-name="T1"> </text:span><text:span text:style-name="T2">(140/40) </text:span> [...]ⲯⲩⲭⲏ §ⲁ̣ϥⲟⲩⲱϣⲃ̅ ⲇⲉ ⲛ̅ϭ̣[ⲓ ⲡⲥⲱ̅ⲣ̅] ⲉϥϫⲱ̣ <text:line-break/><text:span text:style-name="T1"> </text:span><text:span text:style-name="T2">(140/41) </text:span> [ⲙ̅ⲙⲟ]ⲥ̣ [ϫⲉ ⲛⲁⲉ]ⲓ̣ⲁ̣’ⲧ̣[ϥ] ⲙ̣̅ⲡⲥⲁⲃⲉ ⲛ̅ⲣⲱ̣ⲙ̣ⲉ ⲛ̅ⲧ’ⲁϥϣ̣[ⲓ]‐ <text:line-break/><text:span text:style-name="T1"> </text:span><text:span text:style-name="T2">(140/42) </text:span> [ⲛⲉ ⲛ̅ⲥⲁ ⲧⲙⲏⲉ ⲁⲩⲱ ⲛ̅]ⲧ̣ⲁⲣⲉϥϭⲛ̅ⲧⲥ̅ ⲁϥⲙ̅ⲧⲟ’ⲛ ⲙ̅‐ <text:line-break/><text:span text:style-name="T1"> </text:span><text:span text:style-name="T2">(141/1) </text:span> ⲙ’ⲟϥ ⲉϩⲣⲧⲁⲓ̈ ⲉϫⲱⲥ ϣⲁ ⲉⲛⲉϩ ⲁⲩⲱ ⲙ̅ⲡϥⲣ̅ ϩⲟⲧⲉ ϩⲏⲧⲟⲩ <text:line-break/><text:span text:style-name="T1"> </text:span><text:span text:style-name="T2">(141/2) </text:span> ⲛ̅ⲛⲉⲧⲟⲩⲱϣⲉ ⲁϣⲧⲣ̅ⲧⲱ’ⲣϥ §ⲁϥⲟⲩⲱϣⲃ̅ ⲛ̅ϭⲓ ⲑⲱⲙⲁⲥ <text:line-break/><text:span text:style-name="T1"> </text:span><text:span text:style-name="T2">(141/3) </text:span> ⲡⲁϫ’ⲉϥ ϫⲉ ⲥⲣ̅ ⲛⲟϥⲣⲉ ⲛⲁ’ⲛ ⲡϫⲟⲉⲓ’ⲥ ⲁⲙ̅ⲧⲟⲛ ⲙ̅ⲙⲟ’ⲛ <text:line-break/><text:span text:style-name="T1"> </text:span><text:span text:style-name="T2">(141/4) </text:span> ϩⲛ̅ ⲛⲉⲧⲉ ⲛⲱⲛ ⲛ’ⲉ §ⲡⲁϫⲉϥ ⲛ̅ϭⲓ ⲡⲥⲱ̅ⲣ̅ ϫⲉ ⲡⲉⲧⲣ̅ ϣⲁⲩ <text:line-break/><text:span text:style-name="T1"> </text:span><text:span text:style-name="T2">(141/5) </text:span> ⲅⲁⲣ ⲡ’ⲉ ⲁⲩⲱ ⲛⲁⲛⲟⲩⲥ ⲛⲏⲧⲛ̅ ⲉⲡⲓⲇⲏ ⲛⲉⲧⲟⲩⲟⲛϩ <text:line-break/><text:span text:style-name="T1"> </text:span><text:span text:style-name="T2">(141/6) </text:span> ⲉⲃⲟⲗ ϩⲛ̅ ⲣ̅ⲣⲱⲙ’ⲉ ⲥⲉⲛⲁⲃⲱⲗ ⲉⲃⲟⲗ ⲡⲥⲕⲉⲩⲟⲥ ⲅⲁⲣ ⲛ̅‐ <text:line-break/><text:span text:style-name="T1"> </text:span><text:span text:style-name="T2">(141/7) </text:span> ⲧⲟⲩⲥⲁⲣⲝ ⲛⲁⲃⲱⲗ ⲉⲃⲟⲗ ⲁⲩⲱ ⲉϥϣⲁⲛϫⲱⲣⲉ ⲉⲃⲟⲗ <text:line-break/><text:span text:style-name="T1"> </text:span><text:span text:style-name="T2">(141/8) </text:span> ϥⲛⲁϣⲱⲡⲉ ϩⲛ̅ ⲛⲉⲧⲟⲩⲟⲛϩ ⲉⲃⲟⲗ ϩⲛ̅ ⲛⲉⲧⲟⲩⲛⲁⲩ ⲉ‐ <text:line-break/><text:span text:style-name="T1"> </text:span><text:span text:style-name="T2">(141/9) </text:span> ⲣⲟⲟⲩ ⲁⲩⲱ ⲧⲟⲧⲉ ⲡⲕⲱϩ’ⲧ ⲉⲧⲟⲩⲛⲁⲩ ⲉⲣ’ⲟϥ ⲉϥϯ ⲧⲕⲁⲥ ⲛⲁⲩ <text:line-break/><text:span text:style-name="T1"> </text:span><text:span text:style-name="T2">(141/10) </text:span> ⲉⲧⲃⲉ ⲧⲁⲅⲁⲡⲏ ⲛ̅ⲧⲡⲓⲥⲧⲓ’ⲥ ⲉⲧⲉ ⲟⲩⲛ̅ⲧⲁⲩ’ⲥ ϩⲁ ⲑⲏ ⲙ̅ⲡⲓ‐ <text:line-break/><text:span text:style-name="T1"> </text:span><text:span text:style-name="T2">(141/11) </text:span> ⲟⲩⲟⲉⲓϣ ⲡⲁⲗⲓ’ⲛ ⲥⲉⲛⲁⲥⲟⲟⲩϩⲟⲩ ⲁⲡⲉⲧⲟⲩⲟⲛϩ ⲉⲃⲟⲗ <text:line-break/><text:span text:style-name="T1"> </text:span><text:span text:style-name="T2">(141/12) </text:span> ⲛⲉⲧⲛⲁⲩ ⲇⲉ ⲉⲃⲟⲗ ϩⲛ̅ ⲛⲉⲧⲟⲩⲟⲛϩ ⲉⲃⲟⲗ ⲁ’ⲛ ⲁϫⲛ̅ <text:line-break/><text:span text:style-name="T1"> </text:span><text:span text:style-name="T2">(141/13) </text:span> ⲧϣⲟⲣ’ⲡ ⲛ̅ⲁⲅⲁⲡⲏ ⲥⲉⲛⲁⲧⲁⲕⲟ ϩⲙ̅ ⲡⲣ̣ⲟ̣ⲟⲩϣ ⲙ̅ⲡⲃⲓⲟ’ⲥ <text:line-break/><text:soft-page-break/><text:span text:style-name="T1"> </text:span><text:span text:style-name="T2">(141/14) </text:span> ⲙⲛ̅ ⲡⲣⲱⲭ’ϩ ⲙ̅⟦ⲛ̅⟧ⲡⲕⲱϩ’ⲧ ⲛ̅ⲟⲩⲕⲟⲩⲓ̈ ⲛ̅ⲟⲩⲟⲉⲓϣ ϣⲁⲛ‐ <text:line-break/><text:span text:style-name="T1"> </text:span><text:span text:style-name="T2">(141/15) </text:span> ⲧⲉϥⲃⲱⲗ ⲉⲃⲟ’ⲗ ⲛ̅ϭⲓ ⲡⲉⲧⲟⲩⲟⲛϩ ⲉⲃⲟⲗ ⲧⲟⲧⲉ ⲥⲉⲛ’ⲁ‐ <text:line-break/><text:span text:style-name="T1"> </text:span><text:span text:style-name="T2">(141/16) </text:span> ϣⲱⲡ’ⲉ ⲛ̅ϭⲓ ϩⲉ’ⲛⲉⲓⲇⲱⲗⲟⲛ ⲉⲙⲛ̅ⲧⲉⲩ ⲙⲟⲣⲫⲏ ⲁⲩⲱ <text:line-break/><text:span text:style-name="T1"> </text:span><text:span text:style-name="T2">(141/17) </text:span> ⲛ̅ⲧⲙⲏⲧⲉ ⲛ̅ⲛ̅ⲧⲁⲫⲟⲥ ⲛ̅ⲥⲉϣⲱⲡⲉ ϩⲓϫⲛ̅ ⲛ̅ⲕⲱⲥ ⲛ̅ϣⲁ <text:line-break/><text:span text:style-name="T1"> </text:span><text:span text:style-name="T2">(141/18) </text:span> ⲉⲛⲉϩ ϩⲛ̅ ⲟⲩϯ ⲧⲕⲁⲥ ⲙⲛ̅ ⲟⲩⲧⲁⲕⲟ ⲙ̅ⲯⲩⲭⲏ §’ⲁϥⲟⲩⲱ̣‐ <text:line-break/><text:span text:style-name="T1"> </text:span><text:span text:style-name="T2">(141/19) </text:span> ϣⲃ̅ ⲇⲉ ⲛ̅ϭⲓ ⲑⲱⲙⲁⲥ ⲡⲁϫ’ⲉϥ ϫⲉ ⲟⲩ ⲡⲉⲧⲉ ⲟⲩⲛ̅ⲧⲁ’ⲛϥ <text:line-break/><text:span text:style-name="T1"> </text:span><text:span text:style-name="T2">(141/20) </text:span> ⲁϫⲟ’ⲟϥ ⲛ̅ⲛⲁϩⲣⲛ̅ ⲛⲁⲉⲓ ⲏ ⲟⲩ ⲡⲉⲧⲛ̅ⲛⲁϫⲟ’ⲟϥ ⲛ̅ⲃⲗ̅ⲗⲉ‐ <text:line-break/><text:span text:style-name="T1"> </text:span><text:span text:style-name="T2">(141/21) </text:span> ⲉⲩⲉ ⲛ̅ⲣⲱⲙⲉ ⲏ ⲁϣ ⲛ̅ⲥⲃⲱ ⲧⲉⲧⲛ̅ⲛⲁϫⲟⲟ’ⲥ ⲛ̅ⲛⲓⲧ[ⲁⲗ]ⲁ̣ⲓ‐ <text:line-break/><text:span text:style-name="T1"> </text:span><text:span text:style-name="T2">(141/22) </text:span> ⲡⲱⲣⲟⲥ ⲛ̅ⲑⲛⲏⲧⲟⲥ ⲛⲉⲧϫⲱ ⲙ̅ⲙⲟ’ⲥ ϫⲉ ⲁⲛⲉⲓ ⲁ[ⲣ̅ ⲡⲉ]‐ <text:line-break/><text:span text:style-name="T1"> </text:span><text:span text:style-name="T2">(141/23) </text:span> ⲧⲛⲁⲛⲟ’ⲩϥ ⲁⲩⲱ ⲁⲩⲥⲁϩⲟⲩ ⲁ’ⲛ ⲡⲁⲗⲓⲛ ⲇⲉ ⲥⲉⲛⲁϫ[ⲟⲟⲥ] <text:line-break/><text:span text:style-name="T1"> </text:span><text:span text:style-name="T2">(141/24) </text:span> ϫⲉ ⲉⲛⲉ ⲙ̅ⲡⲟⲩϫⲡⲟⲛ ϩⲛ̅ ⲧⲥⲁⲣ’ⲝ ⲛⲉⲛⲛⲁⲥⲟⲩⲱⲛ̣ [ϣ]ⲁ̣ϥ‐ <text:line-break/><text:span text:style-name="T1"> </text:span><text:span text:style-name="T2">(141/25) </text:span> ⲧⲉ ⲁⲛ ⲡⲉ §ⲡⲁϫⲉϥ ⲛ̅ϭⲓ ⲡⲥⲱ̅ⲣ̅ ϫⲉ ϩⲛ̅ ⲟⲩⲙⲏⲉ ⲛ[ⲁⲉⲓ] ⲉ̣‐ <text:line-break/><text:span text:style-name="T1"> </text:span><text:span text:style-name="T2">(141/26) </text:span> ⲧⲙ̅ⲙⲁⲩ ⲙ̅ⲡⲣ̅ⲕⲁⲁⲩ ⲛⲁ’ⲕ ⲛ̅ⲣⲱⲙⲉ ⲁⲗⲗⲁ ⲟⲡⲟⲩ ϩ[ⲱⲥ ⲧⲃ̅]‐ <text:line-break/><text:span text:style-name="T1"> </text:span><text:span text:style-name="T2">(141/27) </text:span> ⲛⲟⲟⲩ’ⲉ ⲛ̅ⲑⲉ ⲅⲁⲣ ⲛ̅ⲛ̅ⲧⲃ̅ⲛⲟⲟⲩⲉ ⲉⲩⲟⲩⲱ’ⲙ ⲛ̣̅ⲛ̣[ⲉⲩⲉ]‐ <text:line-break/><text:span text:style-name="T1"> </text:span><text:span text:style-name="T2">(141/28) </text:span> ⲣⲏ’ⲩ ⲧⲁⲉⲓ ⲧⲉ ⲑⲉ ϩⲱⲟⲩ ⲛ̅ⲛⲉⲉⲓⲣⲱⲙⲉ ⲛ̅ⲧⲉⲉⲓⲙⲓⲛ̣[ⲉ ⲥⲉ]‐ <text:line-break/><text:span text:style-name="T1"> </text:span><text:span text:style-name="T2">(141/29) </text:span> ⲟⲩⲱ’ⲙ ⲛ̅ⲛⲉⲩⲉⲣⲏⲩ ⲁⲗⲗⲁ ⲥⲉϩⲟⲩⲣⲟⲉⲓ’ⲧ ⲛ̅ⲧⲙⲛ̣̅ⲧ̣ⲣ̣̅[ⲣⲟ] <text:line-break/><text:span text:style-name="T1"> </text:span><text:span text:style-name="T2">(141/30) </text:span> ⲉⲡⲓⲇⲏ ⲥⲉⲙⲁⲉⲓⲉ ⲛ̅ⲧϩⲗ̅ϭⲉ ⲙ̅ⲡⲕⲱϩ’ⲧ ⲁⲩⲱ ⲥⲉⲟ ⲛ̅‐ <text:line-break/><text:span text:style-name="T1"> </text:span><text:span text:style-name="T2">(141/31) </text:span> ϩⲙϩ̅ⲁ̅ⲗ̅ ⲙ̅ⲡⲙⲟⲩ ⲁⲩⲱ ⲥⲉⲡⲏ’ⲧ ⲁⲛϩⲃⲏⲩⲉ ⲙ̅ⲡϫⲱϩ̅ⲙⲉ̅ <text:line-break/><text:span text:style-name="T1"> </text:span><text:span text:style-name="T2">(141/32) </text:span> ⲥⲉϫⲱⲕ ⲉⲃⲟⲗ ⲛ̅ⲧⲉⲡⲓⲑⲩⲙⲉⲓⲁ ⲛ̅ⲛⲉⲩⲉⲓⲟⲧⲉ ⲥⲉⲛⲁ‐ <text:line-break/><text:span text:style-name="T1"> </text:span><text:span text:style-name="T2">(141/33) </text:span> ⲛⲟϫⲟⲩ ⲉϩⲣⲁⲓ̈ ⲁⲡⲛⲟⲩ’ⲛ ⲛ̅ⲥⲉⲣ̅ⲙⲁⲥⲧⲓⲅⲟⲩ ⲙ̅ⲙⲟⲟⲩ <text:line-break/><text:span text:style-name="T1"> </text:span><text:span text:style-name="T2">(141/34) </text:span> ⲉⲃⲟⲗ ϩⲓⲧⲛ̅ ⲧⲁⲛⲁ’ⲅⲕⲏ ⲙ̅ⲡⲥⲓϣⲉ ⲛ̅ⲧⲟⲩⲫⲩⲥⲓⲥ ⲉⲑⲟ‐ <text:line-break/><text:span text:style-name="T1"> </text:span><text:span text:style-name="T2">(141/35) </text:span> ⲟⲩ ⲥⲉⲛⲁⲫⲣⲁⲅⲉⲗⲗⲟⲩ ⲅⲁ’ⲣ ⲙ̅ⲙⲟⲟⲩ ⲁⲧⲣⲟⲩⲡⲱ’ⲧ ⲛ̅‐ <text:line-break/><text:span text:style-name="T1"> </text:span><text:span text:style-name="T2">(141/36) </text:span> ⲥⲁϫⲱⲟⲩ ⲁⲡⲙⲁ ⲉⲧⲉ ⲛ̅ⲥⲉⲥⲟⲟⲩⲛ ⲙ̅ⲙⲟϥ ⲁ’ⲛ ⲁⲩⲱ <text:line-break/><text:span text:style-name="T1"> </text:span><text:span text:style-name="T2">(141/37) </text:span> ⲥⲉⲛ̣[ⲁⲗ]ⲟ ⲛ̅ⲛⲉⲩⲙⲉⲗⲟ’ⲥ ϩⲛ̅ ⲟⲩϩⲩⲡⲟⲙⲟⲛⲏ ⲁⲛ̣ ⲁ̣ⲗ̣‐ <text:line-break/><text:span text:style-name="T1"> </text:span><text:span text:style-name="T2">(141/38) </text:span> ⲗⲁ̣ [ϩⲛ̅ ⲟⲩ]ⲕⲁ̣ ⲧⲟⲟⲧ’ⲕ ⲉⲃⲟ’ⲗ ⲁⲩⲱ ⲥⲉⲣⲁϣⲉ ⲉϫⲙ̣̅ [...] <text:line-break/><text:span text:style-name="T1"> </text:span><text:span text:style-name="T2">(141/39) </text:span> ⲣ[...........] ⲡⲗⲓⲃ’ⲉ ⲙⲛ̅ ⲡⲡⲱϣⲥ̅ ⲉⲩⲟ̣ [ⲛ̅...] ‐ <text:line-break/><text:span text:style-name="T1"> </text:span><text:span text:style-name="T2">(141/40) </text:span> [ⲥⲉ]ⲡ̣ⲏⲧ ⲛ̣̅[ⲥⲁ ⲡⲓ]ⲡ̣ⲱϣⲥ̅ ⲛ̅ϩⲏ’ⲧ ⲉⲛ[ⲥ]ⲉⲙ̅ⲙⲉ ⲁ̣[ⲛ ⲙ̅ⲡⲟⲩ]‐ <text:line-break/><text:span text:style-name="T1"> </text:span><text:span text:style-name="T2">(141/41) </text:span> [ⲗⲓ]ⲃ’ⲉ ⲉⲩ[ⲙⲉⲉ]ⲩ̣ⲉ ϫⲉ ϩⲛ̅ⲥⲁⲃⲉⲉⲩ ⲛ[ⲉ ⲥⲉ......] <text:line-break/><text:span text:style-name="T1"> </text:span><text:span text:style-name="T2">(141/42) </text:span> [..]ⲁⲉⲓⲉ ⲙ̅ⲡⲟⲩⲥⲱⲙⲁ ϩ.[..........] <text:line-break/><text:span text:style-name="T1"> </text:span><text:span text:style-name="T2">(142/1) </text:span> ⲉⲣⲉ ⲡⲟⲩϩⲏ’ⲧ ⲡⲟⲟⲛⲉ ⲉⲣⲟⲟ’ⲩ ⲉⲣⲉ ⲡⲟⲩⲙⲉⲉⲩⲉ ϩⲓ <text:line-break/><text:span text:style-name="T1"> </text:span><text:span text:style-name="T2">(142/2) </text:span> ⲛⲉⲩⲡⲣⲁⲝⲓⲥ ⲧⲥⲁⲧⲉ ⲇⲉ ⲧⲉⲧⲛⲁⲣⲱⲕϩ ⲙ̅ⲙⲟⲟ’ⲩ §’ⲁϥ‐ <text:line-break/><text:span text:style-name="T1"> </text:span><text:span text:style-name="T2">(142/3) </text:span> ⲟⲩⲱϣⲃ̅ ⲇⲉ ⲛ̅ϭⲓ ⲑⲱⲙⲁ’ⲥ ⲡⲁϫⲉϥ ϫⲉ ⲡϫⲟⲉⲓ’ⲥ ⲡⲉⲛ‐ <text:line-break/><text:span text:style-name="T1"> </text:span><text:span text:style-name="T2">(142/4) </text:span> ⲧⲁⲩⲛ’ⲟϫϥ ⲉϩⲣⲁⲓ̈ ⲉⲣⲟⲟⲩ ⲉϥⲛⲁⲣ ⲟⲩ ϯⲣ̅ⲙⲉⲣⲓⲙⲛⲁ <text:line-break/><text:span text:style-name="T1"> </text:span><text:span text:style-name="T2">(142/5) </text:span> ⲅⲁⲣ ⲙ̅ⲡϣ’ⲁ ⲉⲧⲃⲏⲧⲟⲩ ϩⲁϩ ⲅⲁ’ⲣ ⲛⲉⲧϯ ⲟⲩⲃⲏⲩ §’ⲁϥⲟⲩ‐ <text:line-break/><text:span text:style-name="T1"> </text:span><text:span text:style-name="T2">(142/6) </text:span> ⲱϣⲃ̅ ⲛ̅ϭⲓ ⲡⲥⲱ̅ⲣ̅ ⲡⲁϫ’ⲉϥ ϫⲉ ⲉⲩ ⲛ̅ⲧⲁ’ⲕ ⲡⲉⲧⲟⲩⲟⲛϩ <text:line-break/><text:span text:style-name="T1"> </text:span><text:span text:style-name="T2">(142/7) </text:span> ⲉⲃⲟⲗ ⲛⲁ’ⲕ §ⲡⲁϫⲉϥ ⲛ̅ϭⲓ ⲓ̈ⲟⲩⲇⲁ’ⲥ ⲡⲁⲓ̈ ⲉⲧⲟⲩⲙⲟⲩⲧⲉ ⲉ‐ <text:line-break/><text:span text:style-name="T1"> </text:span><text:span text:style-name="T2">(142/8) </text:span> ⲣ’ⲟϥ ϫⲉ ⲑⲱⲙⲁⲥ ϫⲉ ⲛ̅ⲧⲟⲕ ⲡϫⲟⲉⲓ’ⲥ ⲡⲉⲧⲥⲣ̅ⲡⲣⲉⲡⲉ’ⲓ <text:line-break/><text:span text:style-name="T1"> </text:span><text:span text:style-name="T2">(142/9) </text:span> ⲛⲁ’ⲕ ⲁϣⲉϫ’ⲉ ⲁⲛⲟⲕ ⲇⲉ ⲛ̅ⲧⲁⲥⲱⲧⲙ̅ ⲉⲣⲟ’ⲕ §’ⲁϥⲟⲩ‐ <text:line-break/><text:span text:style-name="T1"> </text:span><text:span text:style-name="T2">(142/10) </text:span> ⲱϣⲃ̅ ⲛ̅ϭⲓ ⲡⲥⲱ̅ⲣ̅ ϫⲉ ⲥⲱⲧⲙ̅ ⲁⲡⲉϯⲛⲁϫⲟ’ⲟϥ ⲛⲁ’ⲕ <text:line-break/><text:span text:style-name="T1"> </text:span><text:span text:style-name="T2">(142/11) </text:span> ⲛ̅ⲕⲣ̅ⲡⲓⲥⲧⲉⲩⲉ ϩⲛ̅ ⲧⲙⲏⲉ ⲡⲉ’ⲧϫⲟ ⲙⲛ̅ ⲡⲉⲧⲟⲩϫⲟ ⲙ̅ⲙ’ⲟϥ <text:line-break/><text:span text:style-name="T1"> </text:span><text:span text:style-name="T2">(142/12) </text:span> ⲥⲉⲛⲁⲃⲱⲗ ⲉⲃⲟⲗ ϩⲙ̅ ⲡⲟⲩⲕⲱϩ’ⲧ ⲛ̅ϩⲣⲁⲓ̈ ϩⲙ̅ ⲡⲕⲱϩ’ⲧ <text:line-break/><text:span text:style-name="T1"> </text:span><text:span text:style-name="T2">(142/13) </text:span> ⲙⲛ̅ ⲡⲙⲟⲟⲩ̣ [ⲁ]ⲩ̣ⲱ ⲛ̅ⲥⲉϩⲱ’ⲡ ϩⲛ̅ ⲛ̅ⲧⲁⲫⲟ’ⲥ ⲙ̅ⲡⲕⲁⲕⲉ <text:line-break/><text:span text:style-name="T1"> </text:span><text:span text:style-name="T2">(142/14) </text:span> ⲁⲩⲱ ⲙⲛ̅ⲛ̅ⲥⲁ ϩⲁϩ ⲛ̅ⲟⲩⲟⲉⲓϣ ⲥⲉⲛⲁⲟⲩⲱⲛϩ ⲉⲃⲟⲗ ⲛ̅‐ <text:line-break/><text:span text:style-name="T1"> </text:span><text:span text:style-name="T2">(142/15) </text:span> ⲛ̅ⲕⲁⲣⲡⲟⲥ ⲛ̅ⲛ̅ϣⲏ’ⲛ̅ ⲉⲑⲟⲟⲩ ⲉⲩⲣ̅ⲕⲟⲗⲁⲍⲉ ⲙ̅ⲙⲟⲟⲩ ⲉⲩ‐ <text:line-break/><text:span text:style-name="T1"> </text:span><text:span text:style-name="T2">(142/16) </text:span> ϩⲱⲧⲃⲉ ⲙ̅ⲙⲟⲟⲩ ϩⲛ ’ⲧⲧⲁⲡⲣⲟ̓ ⲛ̅ⲛ̅ⲧⲃⲛⲟⲟⲩⲉ ⲙⲛ̅ ⲛ̅ⲣⲱ‐ <text:line-break/><text:span text:style-name="T1"> </text:span><text:span text:style-name="T2">(142/17) </text:span> ⲙ’ⲉ ϩⲛ̅ ⲧⲁⲫⲟⲣⲙ’ⲏ ⲛ̅ⲛ̅ϩⲟⲟⲩ ⲙⲛ̅ ⲛ̅ⲧⲏⲩ ⲙⲛ̅ ⲡⲁⲏ’ⲣ <text:line-break/><text:span text:style-name="T1"> </text:span><text:span text:style-name="T2">(142/18) </text:span> ⲙⲛ̅ ⲡⲟⲩⲟⲉⲓ’ⲛ ⲉⲧⲣ̅ ⲟⲩⲟⲉⲓ’ⲛ ⲙ̅ⲡⲥⲁ ⲛϩⲣⲉ §ⲁϥⲟⲩⲱϣⲃ̅ <text:line-break/><text:soft-page-break/><text:span text:style-name="T1"> </text:span><text:span text:style-name="T2">(142/19) </text:span> ⲇⲉ ⲛ̅ϭⲓ ⲑⲱⲙⲁ’ⲥ ϫⲉ ⲁⲕⲣ̅ⲡⲓⲑⲉ ⲙⲉ’ⲛ ⲙ̅ⲙⲟ’ⲛ ⲡϫⲟⲉⲓ’ⲥ <text:line-break/><text:span text:style-name="T1"> </text:span><text:span text:style-name="T2">(142/20) </text:span> ⲁⲛⲣ̅ⲛⲟⲉⲓ ϩⲙ̅ ⲡⲛ̅ϩⲏ’ⲧ ⲁⲩⲱ ⲥⲟⲩⲟⲛϩ ⲉⲃⲟⲗ ϫⲉ ⲧⲁⲉⲓ <text:line-break/><text:span text:style-name="T1"> </text:span><text:span text:style-name="T2">(142/21) </text:span> [ⲧⲉ ⲑ]ⲉ ⲁⲩⲱ ⲡⲉⲕϣⲁϫⲉ ⲟ ⲛ̅ⲁⲧⲫⲑⲟⲛⲟⲥ ⲁⲗⲗⲁ ⲛⲓϣⲁ‐ <text:line-break/><text:span text:style-name="T1"> </text:span><text:span text:style-name="T2">(142/22) </text:span> [ϫⲉ ⲉ]ⲧⲕϫⲱ ⲙ̅ⲙⲟⲟⲩ ⲛⲁ’ⲛ ϩⲉⲛⲥⲱⲃⲉ ⲛⲉ ⲙ̅ⲡⲕⲟⲥ‐ <text:line-break/><text:span text:style-name="T1"> </text:span><text:span text:style-name="T2">(142/23) </text:span> [ⲙⲟ]’ⲥ ⲁⲩⲱ ϩⲛ̅ⲗ̅ⲕ ϣⲁⲉⲓ ⲛ̅ⲥⲱⲟⲩ ⲛ’ⲉ ⲉⲡⲓⲇⲏ ⲥⲉⲥⲟ‐ <text:line-break/><text:span text:style-name="T1"> </text:span><text:span text:style-name="T2">(142/24) </text:span> [ⲟⲩ]ⲛⲉ ⲙ̅ⲙⲟⲟⲩ ⲁ’ⲛ ⲛ̅ⲁϣ ϭⲉ ⲛ̅ⲣⲏⲧⲉ ⲉⲛⲛⲁϣⲃⲱ’ⲕ ’ⲁ‐ <text:line-break/><text:span text:style-name="T1"> </text:span><text:span text:style-name="T2">(142/25) </text:span> [ⲧⲁ]ϣ̣ⲉ ⲟⲉⲓϣ ⲙ̅ⲙⲟⲟⲩ ⲉⲡⲓⲇⲏ ϫⲉ ⲥⲉⲱ’ⲡ ⲙ̅ⲙⲟ’ⲛ <text:line-break/><text:span text:style-name="T1"> </text:span><text:span text:style-name="T2">(142/26) </text:span> [ⲁ’ⲛ ϩ]ⲙ̣̅ ⲡⲕⲟⲥⲙⲟ’ⲥ §ⲁϥⲟⲩⲱϣⲃ̅ ⲛ̅ϭⲓ ⲡⲥⲱ̅ⲣ̅ ⲡⲁϫⲉϥ ϫⲉ <text:line-break/><text:span text:style-name="T1"> </text:span><text:span text:style-name="T2">(142/27) </text:span> [ϩⲁⲙ]ⲏ’ⲛ ϯϫⲱ ⲙ̅ⲙⲟⲥ ⲛⲏⲧⲛ̅ ϫⲉ ⲡⲉⲧⲛⲁⲥⲱⲧⲙ̅ ⲁⲡⲉ‐ <text:line-break/><text:span text:style-name="T1"> </text:span><text:span text:style-name="T2">(142/28) </text:span> [ⲧⲛ̅ϣ]ⲁ̣ϫ’ⲉ ⲁⲩⲱ ⲛ̅ϥⲕⲧⲟ ⲙ̅ⲡⲉϥϩⲟ ⲉⲃⲟ’ⲗ ⲏ ⲛ̅ϥⲗⲕ ϣⲉ‐ <text:line-break/><text:span text:style-name="T1"> </text:span><text:span text:style-name="T2">(142/29) </text:span> [ⲉ] ⲛ̣̅ⲥ’ⲱϥ ⟦ⲛ̅⟧ ⲏ ⲛ̅ϥⲥⲱⲧⲣ̅ ⲛ̅ⲛ’ⲉϥⲥⲡⲟⲧⲟⲩ ϩⲓ ⲛⲁⲉ[ⲓ] ϩⲁ‐ <text:line-break/><text:span text:style-name="T1"> </text:span><text:span text:style-name="T2">(142/30) </text:span> ⲙⲏ’ⲛ ϯϫⲱ ⲙ̅ⲙⲟⲥ ⲛⲏⲧⲛ̅ ϫⲉ ⲥⲉⲛⲁⲧⲁ’ⲁϥ ⲁⲧⲟⲟⲧϥ̅ <text:line-break/><text:span text:style-name="T1"> </text:span><text:span text:style-name="T2">(142/31) </text:span> ⲙ̅ⲡⲁⲣⲭⲱⲛ ⲉⲧⲙ̅ⲡⲥⲁ ’ⲛⲧⲡ’ⲉ ⲡⲁⲓ̈ ⲉⲧⲁⲣⲭⲉⲓ ⲉϩⲣⲁⲓ̈ ⲉ‐ <text:line-break/><text:span text:style-name="T1"> </text:span><text:span text:style-name="T2">(142/32) </text:span> ϫⲛ̅ ⲛ̅ⲉⲝⲟⲩⲥⲓⲁ ⲧⲏⲣⲟⲩ ⲉϥⲟ ⲛ̅ⲣ̅ⲣⲟ ⲉϫⲱⲟⲩ ⲛ̅ϥⲕⲧⲟ <text:line-break/><text:span text:style-name="T1"> </text:span><text:span text:style-name="T2">(142/33) </text:span> ⲙ̅ⲡⲁⲉⲓ ⲉⲧⲙ̅ⲙⲁⲩ ⲛ̅ϥⲛⲟϫϥ̅ ϫⲛ̅ ⲛ̅ⲧⲡ’ⲉ ϣⲁ ⲡⲓⲧⲛ̅ ’ⲁ‐ <text:line-break/><text:span text:style-name="T1"> </text:span><text:span text:style-name="T2">(142/34) </text:span> ⲡⲛⲟⲩ’ⲛ ⲛ̅ⲥⲉⲱⲣ’ⲉϫ ⲁⲣ’ⲱϥ ϩⲛ̅ ⲟⲩⲙⲁ ⲉϥϭⲏⲩ ⲉϥⲟ <text:line-break/><text:span text:style-name="T1"> </text:span><text:span text:style-name="T2">(142/35) </text:span> ⲛ̅ⲕⲁⲕ’ⲉ ⲙⲁϥϣϭⲛ̅ ϭⲟⲙ ϭⲉ ⲙ̅ⲡⲟⲛ’ⲉϥ ⲏ ⲁⲕⲓ’ⲙ ⲉⲧⲃⲉ <text:line-break/><text:span text:style-name="T1"> </text:span><text:span text:style-name="T2">(142/36) </text:span> ⲡⲓⲛⲟϭ ⲛ̅ⲃⲁⲑⲟ’ⲥ ⲛ̅ⲧⲉ ⲡⲧⲁⲣⲧⲁⲣⲟⲥ ⲙⲛ̅ ⲡⲓⲥ̣[ⲓϣ]ⲉ ⟦ⲉ⟧ <text:line-break/><text:span text:style-name="T1"> </text:span><text:span text:style-name="T2">(142/37) </text:span> [ⲉⲧϩ]ⲟ̣ⲣϣ ⲛ̅ⲧⲉ ⲁⲙⲛ̅ⲧⲉ ⲡⲁⲓ̈ ⲉ’ⲧⲧⲁϫⲣⲏⲩ ⲁ[.....]ⲩ‐ <text:line-break/><text:span text:style-name="T1"> </text:span><text:span text:style-name="T2">(142/38) </text:span> [...] ⲙ̅ⲙⲟⲟⲩ ⲉϩⲟⲩⲛ ⲉⲣ’ⲟϥ [ⲉ]ⲩ̣ϣ̣[.......]ⲁ̣‐ <text:line-break/><text:span text:style-name="T1"> </text:span><text:span text:style-name="T2">(142/39) </text:span> [....] ⲛ̅ⲥⲉⲛ[ⲁ]ⲕⲱ ⲁ’ⲛ ⲉⲃⲟⲗ ⲙ̣̅[....]ⲓ̣ⲃⲉ .[...]‐ <text:line-break/><text:span text:style-name="T1"> </text:span><text:span text:style-name="T2">(142/40) </text:span> [.........]ϥ̣ⲡⲱ’ⲧ ⲛ̅ⲥⲁ ⲧⲏⲛⲉ ⲥ[ⲉⲛⲁ]ⲡ̣ⲁⲣⲁⲇⲓⲇ̣[ⲟⲩ] <text:line-break/><text:span text:style-name="T1"> </text:span><text:span text:style-name="T2">(142/41) </text:span> [..........ⲡⲁⲅ]ⲅⲉⲗⲟ’ⲥ ⲡⲧⲁⲣⲧⲁⲣⲟⲩⲭⲟ̣ⲥ [.] <text:line-break/><text:span text:style-name="T1"> </text:span><text:span text:style-name="T2">(142/42) </text:span> [..............ⲥ]ⲁⲧⲉ ⲉϥⲡⲏ’ⲧ ⲛ̅ⲥⲱⲟⲩ [..] <text:line-break/><text:span text:style-name="T1"> </text:span><text:span text:style-name="T2">(143/1) </text:span> [.]ϩⲉ’ⲛⲫⲣⲁⲅⲉⲗⲗⲟⲩ ⲛ̅ⲥⲁⲧ’ⲉ ⲉⲩⲛⲉϫ ϯ’ⲕ ϯⲕ̅ ⲉⲃⲟ’ⲗ ⲉϩⲟⲩⲛ <text:line-break/><text:span text:style-name="T1"> </text:span><text:span text:style-name="T2">(143/2) </text:span> [ϩ]ⲛ̣̅ ⲫⲟ ⲙ̅ⲡⲉⲧⲟⲩⲡⲏ’ⲧ ⲛ̅ⲥ’ⲱϥ ⲉϥ’ⲡⲏ’ⲧ ⲁⲡⲁⲙⲛⲧⲉ ⲉϥϭⲓ‐ <text:line-break/><text:span text:style-name="T1"> </text:span><text:span text:style-name="T2">(143/3) </text:span> [ⲛ]ⲉ ⲛ̅ⲧⲥⲁⲧ’ⲉ ⲉϥϣⲁⲛⲕⲧ’ⲟϥ ⲁⲣⲏⲥ ⲉϥϭⲛⲧⲥ̅ ⲟ’ⲛ ⲙ̅ⲙⲁⲩ <text:line-break/><text:span text:style-name="T1"> </text:span><text:span text:style-name="T2">(143/4) </text:span> ⲉ̣ϥϣⲁⲛⲕⲧⲟϥ ⲁϩⲏ’ⲧ ϣⲁⲥⲧⲱⲙⲧ ⲉⲣ’ⲟϥ ⲁ’ⲛ ⲛ̅ϭⲓ ⲧⲁⲡⲓⲗⲏ <text:line-break/><text:span text:style-name="T1"> </text:span><text:span text:style-name="T2">(143/5) </text:span> ⲛ̅ⲥⲁⲧ’ⲉ ⲉⲥⲃⲣ̅ⲃⲣ̅ ⲙⲁϥϭⲓⲛⲉ ⲇⲉ ⲛ̅ⲧⲟϥ ⲛ̅ⲑⲓⲏ ⲙ̅ⲡⲁⲉⲓⲃ̅ⲧⲉ <text:line-break/><text:span text:style-name="T1"> </text:span><text:span text:style-name="T2">(143/6) </text:span> ⲁⲡⲱ’ⲧ ⲉⲙⲁⲩ ⲛ̅ϥⲟⲩϫⲁⲉⲓ ⲙ̅ⲡⲉϥ̅ϭⲛⲧⲥ̅ ⲅⲁⲣ ⲙ̅ⲫⲟⲟⲩ ⲉϥ‐ <text:line-break/><text:span text:style-name="T1"> </text:span><text:span text:style-name="T2">(143/7) </text:span> ϩⲛ̅ ⲥⲱⲙ̣[ⲁ] ϫ̣ⲉⲕⲁⲁⲥ ⲉϥⲛⲁϭⲛⲧⲥ̅ ⲙ̅ⲫⲟⲟⲩ ⲛ̅ⲧⲕⲣⲓⲥⲓ’ⲥ <text:line-break/><text:span text:style-name="T1"> </text:span><text:span text:style-name="T2">(143/8) </text:span> ⲧⲟⲧⲉ ’ⲁϥⲟⲩⲱϩ ⲁⲧⲟⲟ’ⲧϥ ⲛ̅ϭⲓ ⲡⲥⲱ̅ⲣ̅ ⲉϥϫⲱ ⲙ̅ⲙⲟⲥ <text:line-break/><text:span text:style-name="T1"> </text:span><text:span text:style-name="T2">(143/9) </text:span> ϫⲉ ⲟⲩⲟⲉⲓ ⲛⲏⲧⲛ̅ ⲛ̅ⲁⲧⲛⲟⲩⲧ’ⲉ ⲉⲧⲉ ⲙⲛ̅ⲧⲉⲩ ϩⲉⲗⲡⲓ’ⲥ <text:line-break/><text:span text:style-name="T1"> </text:span><text:span text:style-name="T2">(143/10) </text:span> ⲉⲧⲧⲁϫⲣⲁⲓ̈’ⲧ ⲉϩⲣⲁⲓ̈ ⲉϫⲛ̅ ⲛⲉⲧⲛⲁϣⲱⲡⲉ ⲁⲛ §ⲟⲩⲟⲓ̈ ⲛⲏⲧⲛ̅ <text:line-break/><text:span text:style-name="T1"> </text:span><text:span text:style-name="T2">(143/11) </text:span> ⲛⲉⲧⲣ̅ϩⲉⲗⲡⲓⲍⲉ ⲁⲧⲥⲁⲣⲝ ⲁⲩⲱ ⲡϣⲧⲉⲕⲟ ⲉⲧⲛⲁⲧⲉⲕⲟ ϣⲁⲛ‐ <text:line-break/><text:span text:style-name="T1"> </text:span><text:span text:style-name="T2">(143/12) </text:span> ⲧⲉ ⲟⲩ ϣⲱⲡⲉ ⲉⲧⲉⲧⲛ̅ⲟⲃϣ̅ ⲁⲩⲱ ⲛ̅ⲁ’ⲧⲧⲉⲕⲟ ⲉⲧⲉⲧⲛ̅ⲙⲉ‐ <text:line-break/><text:span text:style-name="T1"> </text:span><text:span text:style-name="T2">(143/13) </text:span> ⲉⲩⲉ ⲉⲣⲟⲟⲩ ϫⲉ ⲥⲉⲛⲁⲧⲁⲕⲟ ⲁ’ⲛ ⲉⲧⲉ̣[ⲧ]ⲛ̣̅ϩⲉⲗⲡⲓⲥ ⲧⲁϫⲣⲏⲩ <text:line-break/><text:span text:style-name="T1"> </text:span><text:span text:style-name="T2">(143/14) </text:span> ⲁϫⲛ̅ ⲡⲕⲟⲥⲙⲟⲥ ⲁⲩⲱ ⲡⲉⲧⲛ̅ⲛⲟⲩⲧⲉ ⲡⲉ ⲡⲉⲉⲓⲃⲓⲟⲥ <text:line-break/><text:span text:style-name="T1"> </text:span><text:span text:style-name="T2">(143/15) </text:span> ⲉⲧⲉⲧⲛ̅ⲧⲁⲕⲟ ⲛ̅ⲛⲉⲧⲛ̅ⲯⲩⲭⲟⲟⲩ’ⲉ §ⲟⲩⲟⲉⲓ ⲛⲏⲧⲛ̅ ϩⲣⲁⲓ̈ <text:line-break/><text:span text:style-name="T1"> </text:span><text:span text:style-name="T2">(143/16) </text:span> ϩⲙ̅ ⲡⲕⲱϩ’ⲧ ⲉⲧⲣⲱⲕϩ ϩⲣⲁⲓ̈ ϩⲛ̅ ⲧⲏⲛⲉ ϫⲉ ⲟⲩⲁⲧⲥⲓ ⲡⲉ <text:line-break/><text:span text:style-name="T1"> </text:span><text:span text:style-name="T2">(143/17) </text:span> §ⲟⲩⲟⲉⲓ ⲛⲏⲧⲛ̅ ⲉⲃⲟⲗ ϩⲓⲧⲟⲟⲧϥ ⲙ̅ⲡⲕⲁ’ⲧ ⲉⲧⲕⲱⲧⲉ ϩⲛ̅ <text:line-break/><text:span text:style-name="T1"> </text:span><text:span text:style-name="T2">(143/18) </text:span> ⲛⲉⲧⲛ̣̅ⲙⲉⲉⲩⲉ §ⲟⲩⲟⲉⲓ ⲛⲏⲧⲛ̅ ⲛ̅ⲧⲟⲟⲧϥ̅ ⲙ̅ⲡⲙⲟⲩϩ̣ <text:line-break/><text:span text:style-name="T1"> </text:span><text:span text:style-name="T2">(143/19) </text:span> ⲉⲧϩ[ⲛ̅] ⲧⲏⲛⲉ ϫⲉ ϥⲛⲁⲩⲱ’ⲙ ⲛ̅ⲛⲉⲧⲛ̅ⲥⲁⲣ’ⲝ ϩⲛ̅ ⲟⲩⲱⲛϩ <text:line-break/><text:span text:style-name="T1"> </text:span><text:span text:style-name="T2">(143/20) </text:span> ⲉⲃⲟ’ⲗ ⲁⲩⲱ ϥⲛⲁⲡⲱϩ ⲛ̅ⲛⲉⲧⲛ̅ⲯⲩⲭⲟⲟⲩ’ⲉ ϩⲛ̅ ⲟⲩ‐ <text:line-break/><text:span text:style-name="T1"> </text:span><text:span text:style-name="T2">(143/21) </text:span> ϩⲱⲡ ⲛ̣̅ϥⲥⲃ̅ⲧⲉ ⲧⲏⲛⲉ ϩⲣⲁⲓ̈ ϩⲛ̅ ⲛⲉⲧⲛ̅ⲉⲣⲏ’ⲩ §ⲟⲩⲟ̣ⲓ̣̈ [ⲛ]ⲏ̣‐ <text:line-break/><text:span text:style-name="T1"> </text:span><text:span text:style-name="T2">(143/22) </text:span> ⲧⲛ̅ ⲛ̅ⲁⲓⲭⲙⲁⲗⲱⲧⲟⲥ ϫⲉ ⲧⲉⲧⲛ̅ⲙⲏ’ⲣ ϩⲛ̅ ⲛ̅ⲥⲡⲏⲗ[ⲁⲓ]‐ <text:line-break/><text:span text:style-name="T1"> </text:span><text:span text:style-name="T2">(143/23) </text:span> ⲟ’ⲛ ⲧⲉⲧⲛ̅ⲥⲱⲃⲉ ⲉⲧⲉⲧⲛ̅ⲣⲁϣⲉ ϩⲣⲁⲓ̈ ϩⲛ̅ ⲛ̅ⲥⲱⲃ[ⲉ] <text:line-break/><text:soft-page-break/><text:span text:style-name="T1"> </text:span><text:span text:style-name="T2">(143/24) </text:span> ⲛ̅ⲗⲓⲃⲉ ⲧⲉⲧⲛ̅ⲣ̅ⲛⲟⲉⲓ ⲁⲛ ⲙ̅ⲡⲉⲧⲛ̅ⲧⲁⲕⲟ ⲟⲩⲧⲉ ⲧ[ⲉ]‐ <text:line-break/><text:span text:style-name="T1"> </text:span><text:span text:style-name="T2">(143/25) </text:span> ⲧⲛ̅ⲣ̅ⲛⲟⲉⲓ ⲁ’ⲛ ϩⲛ̅ ⲛⲉⲧⲉⲧⲛ̅〈ⲛ̅〉ϩⲏⲧⲟⲩ ⲟⲩⲧⲉ ⲙ̅ⲡ̣[ⲉⲧ]ⲛ̣̅‐ <text:line-break/><text:span text:style-name="T1"> </text:span><text:span text:style-name="T2">(143/26) </text:span> ⲙ̣̅ⲙⲉ ϫⲉ ⲧⲉⲧⲛ̅ϣⲟⲟ’ⲡ ϩⲙ̅ ⲡⲕⲁⲕ’ⲉ ⲙⲛ̅ ⲡⲙⲟ̣[ⲩ] <text:line-break/><text:span text:style-name="T1"> </text:span><text:span text:style-name="T2">(143/27) </text:span> ⲁⲗⲗⲁ ⲉⲧⲉⲧⲛ̅ⲧⲁϩⲉ ϩⲙ̅ ⲡⲕⲱϩ’ⲧ ⲁⲩⲱ ⲧⲉⲧⲛ̣̅[ⲙⲉϩ] <text:line-break/><text:span text:style-name="T1"> </text:span><text:span text:style-name="T2">(143/28) </text:span> ⲛ̅ⲥⲓϣ’ⲉ ⲉⲣⲉ ⲡⲉⲧⲛ̅ϩⲏ’ⲧ ⲡⲟϣⲥ̅ ⲉⲣⲱⲧⲛ̅ ⲉⲧⲃⲉ ⲡ[ⲙ]ⲟ̣ⲩϩ <text:line-break/><text:span text:style-name="T1"> </text:span><text:span text:style-name="T2">(143/29) </text:span> ⲉ̣ⲧ̣[ϩ]ⲛ̅ ⲧⲏⲛ’ⲉ ⲁⲩⲱ ϥϩⲟⲗϭ ⲛⲏⲧⲛ̅ ⲛ̅ϭⲓ ⲡⲕⲗⲟ ⲙⲛ̣̅ <text:line-break/><text:span text:style-name="T1"> </text:span><text:span text:style-name="T2">(143/30) </text:span> ⲧⲡⲗⲏⲅⲏ ⲛ̅ⲛⲉⲧⲛ̅ϫⲁϫ’ⲉ ⲁⲩⲱ ⲡⲕⲁⲕⲉ ⲁϥϣⲁⲉ ⲛⲏ‐ <text:line-break/><text:span text:style-name="T1"> </text:span><text:span text:style-name="T2">(143/31) </text:span> ⲧⲛ̅ ⲛ̅ⲑⲉ ⲙ̅ⲡⲟⲩⲟⲉⲓ’ⲛ ⲧⲉⲧⲛⲙ̅ⲛ̅ⲧⲣⲙ̅ϩⲉ ⲅⲁ’ⲣ ⲁⲧⲉⲧⲛ̅ <text:line-break/><text:span text:style-name="T1"> </text:span><text:span text:style-name="T2">(143/32) </text:span> ⲧⲁⲁⲥ ⲛ̅ⲧⲙ̅ⲛ̅ⲧ̅ϩⲙϩ̅ⲁⲗ̅ ⲁⲧⲉⲧⲛ̅ⲉⲓⲣⲉ ⲛ̅ⲛⲉⲧⲛ̅ϩⲏ’ⲧ ⲛ̅‐ <text:line-break/><text:span text:style-name="T1"> </text:span><text:span text:style-name="T2">(143/33) </text:span> ϩⲏ’ⲧ ⲛ̅ⲕⲁⲕ’ⲉ ⲁⲩⲱ ⲛ̣ⲉⲧⲛ̅ⲙⲉⲉⲩ’ⲉ ⲁⲧⲉⲧⲛ̅ⲧⲁⲁⲩ <text:line-break/><text:span text:style-name="T1"> </text:span><text:span text:style-name="T2">(143/34) </text:span> ⲛ̅ⲧⲙⲛ̅ⲧⲥⲉϭ’ⲉ ⲁⲩⲱ ⲁⲧⲉⲧⲛ̅ⲙⲟⲩϩ ⲛ̅ⲛⲉⲧⲛ̅ⲙⲉ‐ <text:line-break/><text:span text:style-name="T1"> </text:span><text:span text:style-name="T2">(143/35) </text:span> ⲉ[ⲩ]ⲉ̣ ϩⲛ̅ ⲡⲕⲁⲡⲛⲟ’ⲥ ⲙ̅ⲡⲕⲱϩ’ⲧ ⲉⲧϩⲛ̅ ⲧⲏⲛⲉ ⲁⲩ‐ <text:line-break/><text:span text:style-name="T1"> </text:span><text:span text:style-name="T2">(143/36) </text:span> ⲱ̣ [ⲁϥϩ]ⲱ̣’ⲡ ⲛ̅ϭⲓ ⲡⲉⲧⲛ̅ⲟⲩⲟⲉⲓⲛ’ⲉ ϩⲛ̅ ⲧⲕⲗⲟⲟⲗⲉ <text:line-break/><text:span text:style-name="T1"> </text:span><text:span text:style-name="T2">(143/37) </text:span> [ⲛ̅.... ⲁ]ⲩⲱ̣ ⲧϩⲃⲥⲱ ⲉ’ⲧⲧⲟ ϩⲓ ⲧⲏⲛⲉ ⲁⲧⲉⲧⲛⲡ̣[ ]‐ <text:line-break/><text:span text:style-name="T1"> </text:span><text:span text:style-name="T2">(143/38) </text:span> [.........]ⲣ̣’ⲟ̣ϥ̣ ⲁⲩⲱ ⲁⲩⲣ̅ⲕⲁⲧⲉⲭⲉ ⲙ̅ⲙⲱ[ⲧⲛ̅ ϩⲓ]‐ <text:line-break/><text:span text:style-name="T1"> </text:span><text:span text:style-name="T2">(143/39) </text:span> [ⲧⲛ̅] ⲑⲉⲗ[ⲡⲓⲥ ⲉⲧ]ϣⲟⲟ’ⲡ ⲁⲛ ⲁⲩⲱ̣ ⲛ̣[ⲓ]ⲙ ⲡⲉⲛⲧ[ⲁⲧⲉ]‐ <text:line-break/><text:span text:style-name="T1"> </text:span><text:span text:style-name="T2">(143/40) </text:span> [ⲧⲛ̅]ⲡⲓⲥⲧ[ⲉⲩⲉ] ⲉ̣ⲣ’ⲟϥ ⲧⲉⲧⲛ̅ⲥⲟ̣ⲟ̣[ⲩⲛ ⲁⲛϫⲉ ⲧⲉⲧⲛ̅]‐ <text:line-break/><text:span text:style-name="T1"> </text:span><text:span text:style-name="T2">(143/41) </text:span> [ϣⲟ̣ⲟⲡ ⲧⲏⲣⲧⲛ̅ ϩⲛ̅ ⲛⲉⲧ[.................]‐ <text:line-break/><text:span text:style-name="T1"> </text:span><text:span text:style-name="T2">(143/42) </text:span> [..]ⲟⲩ ⲙ̅ⲙⲱⲧⲛ̅ ϩⲱⲥ ⲉⲧ̣[ⲉⲧ’ⲛ̅..............] <text:line-break/><text:span text:style-name="T1"> </text:span><text:span text:style-name="T2">(144/1) </text:span> ⲁⲧⲉⲧⲛ̅ⲱⲱⲙⲥ̅ ⲛ̅ⲛⲉⲧⲛ̅ⲯⲩⲭ’ⲏ ϩⲙ̅ ⲡⲙⲟⲟⲩ ⲙ̅ⲡⲕⲁⲕ[ⲉ] <text:line-break/><text:span text:style-name="T1"> </text:span><text:span text:style-name="T2">(144/2) </text:span> ⲁⲧⲉⲧⲛ̅ⲡⲱ’ⲧ ϩⲛ̅ ⲛⲉⲧⲛ̅ⲟⲩⲱϣⲉ ⲙ̅ⲙⲓ’ⲛ ⲙ̅ⲙⲱⲧⲛ̅ §ⲟⲩ‐ <text:line-break/><text:span text:style-name="T1"> </text:span><text:span text:style-name="T2">(144/3) </text:span> ⲟⲉⲓ ⲛⲏⲧⲛ̅ ⲛⲉ’ⲧϣⲟⲟ’ⲡ ϩⲙ̅ ⲡⲥⲱⲣⲙ̅ ⲉⲧⲉⲧⲛ̅ϭⲁϣ’ⲧ <text:line-break/><text:span text:style-name="T1"> </text:span><text:span text:style-name="T2">(144/4) </text:span> ⲁⲛ ⲁⲡⲟⲩⲟⲉⲓⲛ ⲙ̅ⲡⲣ’ⲏ ⲡⲉⲧⲕⲣⲓⲛⲉ ⲙ̅ⲡⲧⲏ’ⲣϥ ⲉ’ⲧ‐ <text:line-break/><text:span text:style-name="T1"> </text:span><text:span text:style-name="T2">(144/5) </text:span> ϭⲁϣ’ⲧ ⲁϫⲛ̅ ⲡⲧⲏ’ⲣϥ ϫⲉ ϥⲛⲁⲕⲱⲧⲉ ⲁϫⲛ̅ ⲛ̅ϩⲃⲏⲩⲉ <text:line-break/><text:span text:style-name="T1"> </text:span><text:span text:style-name="T2">(144/6) </text:span> ⲧⲏⲣⲟⲩ ⲁⲧⲣⲉ ⲛ̅ϫⲁϫⲉ ⲣ̅ ϩⲙϩ̅ⲁ̅ⲗ̅ ⲁⲩⲱ ⲟⲛ ⲧⲉⲧⲛ̅ⲣ̅ⲛⲟⲉⲓ <text:line-break/><text:span text:style-name="T1"> </text:span><text:span text:style-name="T2">(144/7) </text:span> ⲁⲛ ⲙ̅ⲡⲟⲟϩ ϫⲉ ⲛ̅ⲁϣ ⲛ̅ϩⲉ ⲛ̅ⲧⲟⲩϣⲏ ⲙⲛ̣̅ ⲫⲟⲟⲩ ’ⲉϥ‐ <text:line-break/><text:span text:style-name="T1"> </text:span><text:span text:style-name="T2">(144/8) </text:span> ϭⲁϣ’ⲧ ⲉϩⲣⲁⲓ̈ ⲉϥⲛⲁⲩ ⲁⲛⲥⲱⲙⲁ ⲛ̅ⲛⲉⲧ[ⲛ̅]ϩⲉⲧⲃⲉ §ⲟⲩⲟⲓ̈ <text:line-break/><text:span text:style-name="T1"> </text:span><text:span text:style-name="T2">(144/9) </text:span> ⲛⲏⲧⲛ̅ ⲛⲉⲧⲙⲁⲉⲓⲉ ⲛ̅ⲧⲥⲩⲛⲏⲑⲉⲓ’ⲁ ⲛ̅ⲧⲙ̅ⲛ̅ⲧ̅ⲥϩⲓⲙⲉ <text:line-break/><text:span text:style-name="T1"> </text:span><text:span text:style-name="T2">(144/10) </text:span> ⲙⲛ̅ ⲡⲉⲥϣⲱⲡⲉ ⲛⲙ̅ⲙⲁⲥ ⲉⲧⲥⲟ’ⲟϥ §ⲁⲩⲱ ⲟⲩⲟⲉ’ⲓ <text:line-break/><text:span text:style-name="T1"> </text:span><text:span text:style-name="T2">(144/11) </text:span> ⲛⲏⲧⲛ̅ ⲛ̅ⲧⲟⲟⲧⲟⲩ ⲛ̅ⲛ̅ⲉⲝⲟⲩⲥⲓⲁ ⲙ̅ⲡⲉⲧⲛ̅ⲥⲱⲙⲁ ϫⲉ <text:line-break/><text:span text:style-name="T1"> </text:span><text:span text:style-name="T2">(144/12) </text:span> ⲛⲉⲧⲙ̅ⲙⲟ ⲅⲁ’ⲣ ⲥⲉⲛⲁⲑⲙ̅ⲕⲉ ⲧⲏⲛ’ⲉ §ⲟⲩⲟⲓ̈ ⲛⲏⲧⲛ̅ ⲛ̅ⲧⲟ‐ <text:line-break/><text:span text:style-name="T1"> </text:span><text:span text:style-name="T2">(144/13) </text:span> ⲟⲧⲟⲩ ⲛ̅ⲛ̅ⲉⲛⲉⲣⲅⲉⲓⲁ ⲛ̅ⲛ̅ⲇⲁⲓⲙⲱ’ⲛ ⲙ̅ⲡⲟⲛⲏⲣⲟ’ⲛ <text:line-break/><text:span text:style-name="T1"> </text:span><text:span text:style-name="T2">(144/14) </text:span> §ⲟⲩⲟⲓ̈ ⲛⲏⲧⲛ̅ ⲛⲉ’ⲧⲥⲱ’ⲕ ⲛ̅ⲛⲉⲩⲙⲉⲗⲟ’ⲥ ϩⲙ̅ ⲡⲕⲱϩ’ⲧ <text:line-break/><text:span text:style-name="T1"> </text:span><text:span text:style-name="T2">(144/15) </text:span> ⲛⲓ’ⲙ ⲡⲉⲧⲛⲁϩⲱⲟⲩ ⲛⲏⲧⲛ̅ ⲛ̅ⲟⲩⲉⲓⲱⲧ’ⲉ ⲛⲙ̅ⲧⲟⲛ <text:line-break/><text:span text:style-name="T1"> </text:span><text:span text:style-name="T2">(144/16) </text:span> ϫⲉⲕⲁⲁⲥ ⲉⲥⲛⲁϩⲱⲧⲙ̅ ⲛ̅ϩⲁϩ ⲛ̅ⲕⲱϩ’ⲧ ⲉⲃⲟⲗ ϩⲛ̅ ⲧⲏⲛⲉ <text:line-break/><text:span text:style-name="T1"> </text:span><text:span text:style-name="T2">(144/17) </text:span> ⲙⲛ̅ ⲡⲉⲧⲛ̅ⲣⲱⲕ’ϩ ⲛⲓⲙ ⲡⲉⲧⲛⲁϯ ⲛⲏⲧⲛ̅ ⲙ̅ⲡⲣⲏ ⲁ̣ⲡⲣ̅‐ <text:line-break/><text:span text:style-name="T1"> </text:span><text:span text:style-name="T2">(144/18) </text:span> ⲣⲓⲉ ⲁϫⲛ̅ ⲧⲏⲛ’ⲉ ⲁⲃⲱⲗ ⲉⲃⲟⲗ ⲙ̅ⲡⲕⲁⲕ’ⲉ ⲉⲧϩⲛ̅ ⲧⲏⲛⲉ <text:line-break/><text:span text:style-name="T1"> </text:span><text:span text:style-name="T2">(144/19) </text:span> ⲁ̣ⲩⲱ ⲁϩⲱ’ⲡ ⲙ̅ⲡⲕⲁⲕⲉ ⲙⲛ̅ ⲡⲙⲟⲟⲩ ⲉⲧⲥⲟ’ⲟϥ̣ §ⲡⲣⲏ <text:line-break/><text:span text:style-name="T1"> </text:span><text:span text:style-name="T2">(144/20) </text:span> ⲙⲛ̅ ⲡⲟϩ ⲛⲁϯ ⲥϯⲛⲟⲩϥⲉ ⲛⲏⲧⲛ̅ ⲙⲛ̅ ⲡⲁⲏⲣ̣ ⲙⲛ̅ <text:line-break/><text:span text:style-name="T1"> </text:span><text:span text:style-name="T2">(144/21) </text:span> ⲡⲡⲛ̅ⲁ̅ ⲙⲛ̅ ⲡⲕⲁϩ ⲙⲛ̅ ⲡⲙⲟⲟⲩ ⲡⲣⲏ ⲅⲁ’ⲣ ⲉϥⲧ̣ⲙ̣̅‐ <text:line-break/><text:span text:style-name="T1"> </text:span><text:span text:style-name="T2">(144/22) </text:span> ⲡ̣ⲣ̅ⲣⲓⲉ ⲁϫⲛ̅ ⲛⲓⲥⲱⲙ’ⲁ ⲥⲉⲛⲁⲗⲟϥⲗ’ⲉϥ ⲛ̅ⲥⲉ[ⲧ]ⲁⲕⲟ̣ <text:line-break/><text:span text:style-name="T1"> </text:span><text:span text:style-name="T2">(144/23) </text:span> [ⲙ̅]ⲡⲣⲏⲧⲉ ϩⲱ’ⲱϥ ⲛ̅ⲟⲩⲛ̅ⲧⲏϭ ⲏ ⲟⲩⲭⲟⲣⲧⲟ’ⲥ ⲉϣⲱⲡⲉ <text:line-break/><text:span text:style-name="T1"> </text:span><text:span text:style-name="T2">(144/24) </text:span> [ⲙ]ⲉⲛ ⲉⲡⲣⲏ ⲡⲣ̅ⲣⲓⲉ ⲁϫ’ⲱϥ ϣⲁϥϭⲛ̅ ϭⲁ’ⲙ ⲛ̅ϥⲱϭ’ⲧ <text:line-break/><text:span text:style-name="T1"> </text:span><text:span text:style-name="T2">(144/25) </text:span> [ⲛ̅]ⲧ̣ⲃⲱ ⲛ̅ⲉⲗⲟⲟⲗ’ⲉ ⲉϣⲱⲡⲉ ⲇⲉ ⲉⲥϣⲁⲛϭⲛ̅ ϭⲟⲙ <text:line-break/><text:span text:style-name="T1"> </text:span><text:span text:style-name="T2">(144/26) </text:span> [ⲛ̅]ϭⲓ ⲧⲃⲱ ⲛ̅ⲉⲗⲟⲟⲗ’ⲉ ⲛ̅ⲥⲣ̅ ϩⲁⲓ̈ⲃⲉⲥ ⲁϫⲛ̅ ⲛⲓⲛ̅ⲧ’ⲏϭ <text:line-break/><text:span text:style-name="T1"> </text:span><text:span text:style-name="T2">(144/27) </text:span> [ⲙ]ⲛ̣̅ ⲛⲓⲕⲉⲫϣⲛⲁ ⲧⲏⲣⲟⲩ ⲉⲧⲣⲏ’ⲧ ⲉϩⲣⲁⲓ̈ ⲛⲙ̅ⲙⲁ’ⲥ ⲛ̅[ⲥ]‐ <text:line-break/><text:span text:style-name="T1"> </text:span><text:span text:style-name="T2">(144/28) </text:span> [ⲡⲱⲣ]’ϣ ⲉⲃⲟ’ⲗ ⲁⲩⲱ ⲛ̅ⲥⲟⲩⲟⲥⲧⲛ̅ ⲉⲃⲟⲗ ϣⲁⲥⲣ̅ⲕⲗⲏ‐ <text:line-break/><text:soft-page-break/><text:span text:style-name="T1"> </text:span><text:span text:style-name="T2">(144/29) </text:span> [ⲣⲟ]ⲛ̣[ⲟ]ⲙⲉⲓ ⲙ̅ⲡⲕⲁϩ ⲟⲩⲁⲁⲧⲥ̅ ⲡⲁⲓ̈ ⲉⲧⲥⲣⲏⲧ̓ ϩⲣⲁⲓ̈ ⲛ̅ϩⲏⲧϥⲡ̅ <text:line-break/><text:span text:style-name="T1"> </text:span><text:span text:style-name="T2">(144/30) </text:span> ⲁⲩⲱ ⲁⲥⲣ̅ ⲛⲁ’ⲡ ⲁⲙⲁ ⲛⲓ’ⲙ ⲉⲧⲁⲥⲣ̅ ϩⲁⲓ̈ⲃⲉ’ⲥ ⲁϫ’ⲱ̣ϥ̣ <text:line-break/><text:span text:style-name="T1"> </text:span><text:span text:style-name="T2">(144/31) </text:span> ⲧⲟⲧⲉ ϭⲉ ⲉⲥϣⲁ’ⲛⲁⲩⲝⲁⲛ’ⲉ ϣⲁⲥⲣ̅ ⲛⲉ’ⲡ ⲁⲡⲕⲁϩ ⲧⲏⲣϥ <text:line-break/><text:span text:style-name="T1"> </text:span><text:span text:style-name="T2">(144/32) </text:span> ⲁⲩⲱ ϣⲁⲥⲣ̅ ϩⲉⲛⲟⲩϥⲉ̅ ⲙ̅ⲡⲉⲥϫⲟⲉⲓⲥ ⲛ̅ⲥⲁⲣ̅ ⲁⲛ’ⲁϥ̣ <text:line-break/><text:span text:style-name="T1"> </text:span><text:span text:style-name="T2">(144/33) </text:span> ⲛ̅ϩⲟⲩⲟ ϫⲉ ⲛⲉϥⲛⲁϣⲱ’ⲡ ⲅⲁ’ⲣ ⲛ̅ϩⲉⲛⲛⲟϭ ⲛ̅ϩⲓⲥⲉ <text:line-break/><text:span text:style-name="T1"> </text:span><text:span text:style-name="T2">(144/34) </text:span> ⲡ’ⲉ ⲉⲧⲃⲉ ⲛⲓⲛ̅ⲧⲏϭ ϣⲁⲛⲧϥ̅ⲡⲟⲣⲕⲟⲩ ⲁⲗⲗⲁ ⲧⲃⲱ <text:line-break/><text:span text:style-name="T1"> </text:span><text:span text:style-name="T2">(144/35) </text:span> ⲛ̅ⲉⲗⲟⲟⲗⲉ ⲟⲩⲁⲁⲧⲥ̅ ⲁⲥϥⲓⲧⲟⲩ ⲙ̅ⲙⲁⲩ ⲁⲩⲱ ⲁⲥⲱϭⲧ ⲙ̅‐ <text:line-break/><text:span text:style-name="T1"> </text:span><text:span text:style-name="T2">(144/36) </text:span> ⲙⲟⲟⲩ ⲁⲩⲙⲟⲩ ⲁⲩϣⲱⲡⲉ ⲛ̅ⲑⲉ ⲙ̅ⲡⲕⲁϩ §ⲧⲟⲧⲉ̣ [’ⲁ]ϥ̣‐ <text:line-break/><text:span text:style-name="T1"> </text:span><text:span text:style-name="T2">(144/37) </text:span> ⲟ̣ⲩⲱϩ ⲉⲧⲟⲟ’ⲧϥ ⲛ̅ϭⲓ ⲓ̅ⲥ̅ ⲡⲁϫⲉϥ ⲛⲁⲩ ϫⲉ ⲟⲩⲟ̣[ⲉⲓ ⲛ]ⲏ‐ <text:line-break/><text:span text:style-name="T1"> </text:span><text:span text:style-name="T2">(144/38) </text:span> [ⲧⲛ̅] ϫⲉ ⲙ̅ⲡⲉⲧⲛ̅ϫⲓ ⲛ̅ⲧⲥⲃ’ⲱ ⲁⲩⲱ ⲛⲉ̣ⲧⲟ̣ [.....]‐ <text:line-break/><text:span text:style-name="T1"> </text:span><text:span text:style-name="T2">(144/39) </text:span> [...] ⲥⲉⲛⲁϩⲓⲥⲉ ⲉⲩⲧⲁϣⲉ ⲟⲉⲓ̣ϣ̣’ [..........]‐ <text:line-break/><text:span text:style-name="T1"> </text:span><text:span text:style-name="T2">(144/40) </text:span> [.. ] ⲁ̣ⲩ̣ⲱ̣ ⲧⲉ̣[ⲧ]ⲛ̣̅ⲡⲏⲧ’ ⲁϩⲟⲩⲛ ⲁ.[..].ϣⲛ[....] <text:line-break/><text:span text:style-name="T1"> </text:span><text:span text:style-name="T2">(144/41) </text:span> [..........] ⲛ̣ⲁ̣ⲧⲛ̅ⲛⲟⲟⲩⲥ̣[ⲉ ⲁⲡ]ⲓ̣ⲧⲛ̅ ⲛ̅ⲛⲁ̣‐ <text:line-break/><text:span text:style-name="T1"> </text:span><text:span text:style-name="T2">(144/42) </text:span> [............]ⲧⲛ̅ⲙⲟⲟⲩⲧⲟⲩ ⲙ̅ⲙⲏⲛ̣[ⲉ] <text:line-break/><text:span text:style-name="T1"> </text:span><text:span text:style-name="T2">(145/1) </text:span> ϫⲉⲕⲁⲁⲥ ⲉⲩⲛⲁⲧⲱⲟⲩⲛ ϩⲙ̅ ⲡⲙⲟⲩ §ⲛⲁⲉⲓⲁⲧ’ⲧⲏⲛⲉ <text:line-break/><text:span text:style-name="T1"> </text:span><text:span text:style-name="T2">(145/2) </text:span> ⲛⲉⲧⲣ̅ϣⲣⲡ’ⲛⲙ̅ⲙⲉ’ ⲁⲛⲥⲕⲁⲛⲇⲁⲗⲟⲛ’ ⲁⲩⲱ ⲉⲧⲡⲱⲧ’ <text:line-break/><text:span text:style-name="T1"> </text:span><text:span text:style-name="T2">(145/3) </text:span> † ϩⲏⲧϥ̅ ⲛ̅ⲛ̅ⲁⲗⲗⲟⲧⲣⲓⲟⲛ’ §ⲛⲁⲉⲓⲁⲧ’ⲧⲏⲛⲉ ⲛⲉⲧⲟⲩⲛⲟϭ‐ <text:line-break/><text:span text:style-name="T1"> </text:span><text:span text:style-name="T2">(145/4) </text:span> ⲛⲉϭ ⲙ̅ⲙⲟⲟⲩ ⲁⲩⲱ ⲉⲩⲱⲡ’ ⲙ̅ⲙⲟⲟⲩ ⲁⲛ’ ⲉⲧⲃⲉ ⲡⲙⲁⲉⲓⲉ <text:line-break/><text:span text:style-name="T1"> </text:span><text:span text:style-name="T2">(145/5) </text:span> ⲉⲧⲉⲩⲛ̅ⲧⲁϥϥ’ ⲉϩⲟⲩⲛ ⲉⲣⲟⲟⲩ ⲛ̅ϭⲓ ⲡⲟⲩϫⲟⲉⲓⲥ §ⲛⲁⲉⲓⲁⲧ’‐ <text:line-break/><text:span text:style-name="T1"> </text:span><text:span text:style-name="T2">(145/6) </text:span> ⲧⲏⲛⲉ ⲛⲉⲧⲣⲓⲙⲉ ⲁⲩⲱ ⲉⲧⲟⲩⲣ̅ⲑⲗⲓⲃⲉ ⲙ̅ⲙⲟⲟⲩ ϩⲓⲧⲛ̅ <text:line-break/><text:span text:style-name="T1"> </text:span><text:span text:style-name="T2">(145/7) </text:span> ⲛⲉⲧⲉ ⲙ̣[ⲛ̅ⲧⲉ]ⲩ ϩⲉⲗⲡⲓⲥ ϫⲉ ⲥⲉⲛⲁⲃⲱⲗ ⲧⲏⲛⲉ ϩⲓⲧⲛ̅ ⲙⲣ̅‐ <text:line-break/><text:span text:style-name="T1"> </text:span><text:span text:style-name="T2">(145/8) </text:span> ⲣⲉ ⲛⲓⲙ §ⲡⲟⲉ̣ⲓⲥ ⲉⲧⲉⲧⲛ̅ⲥⲟⲡⲥ̅ ϫⲉ ⲉⲧⲉⲧⲛⲁϣⲱⲡ̣ⲉ ⲁⲛ <text:line-break/><text:span text:style-name="T1"> </text:span><text:span text:style-name="T2">(145/9) </text:span> ϩⲛ̅ ⲧⲥⲁⲣⲝ’ ⲁⲗⲗⲁ ϫⲉ ⲉⲧⲉⲧⲛⲁⲉⲓ ⲉⲃⲟⲗ ϩⲛ̅ ⲧⲙⲣ̅ⲣⲉ ⲙ̅ⲡⲥ̣ⲓ‐ <text:line-break/><text:span text:style-name="T1"> </text:span><text:span text:style-name="T2">(145/10) </text:span> ϣⲉ ⲛ̅ⲧⲉ ⲡⲃⲓⲟⲥ ⲁⲩⲱ ⲉⲧⲉⲧⲛ̅ⲥⲟⲡⲥ̅ ⲧⲉⲧⲛ̅ⲛⲁϭⲓⲛⲉ <text:line-break/><text:span text:style-name="T1"> </text:span><text:span text:style-name="T2">(145/11) </text:span> ⲛ̅ⲟⲩⲙ̅ⲧⲟⲛ ϫⲉ ⲁⲧⲉⲧⲛ̅ⲕⲱ ⲛ̅ⲥⲱⲧⲛ̅ ⲙ̅ⲡϩⲓⲥⲉ ⲙⲛ̅ ⲡⲛⲟϭ‐ <text:line-break/><text:span text:style-name="T1"> </text:span><text:span text:style-name="T2">(145/12) </text:span> ⲛⲉϭ ⲛ̅ϩⲏⲧ’ ⲉⲧⲉⲧⲛ̅ϣⲁⲛⲉⲓ ⲅⲁⲣ ⲉⲃⲟⲗ ϩⲛ̅ ⲛ̅ϩⲓⲥⲉ ⲙⲛ̅ <text:line-break/><text:span text:style-name="T1"> </text:span><text:span text:style-name="T2">(145/13) </text:span> ⲙ̅ⲡⲁⲑⲟⲥ ⲛ̅ⲧⲉ ⲡⲥⲱⲙⲁ’ ⲧⲉⲧⲛⲁϫⲓ [ⲛ̅ⲟ]ⲩⲁⲛⲁ̣ⲡⲁⲩⲥⲓⲥ <text:line-break/><text:span text:style-name="T1"> </text:span><text:span text:style-name="T2">(145/14) </text:span> ⲛ̅ⲧⲟⲟⲧϥ ⲙ̅ⲡⲁⲅ̣ⲁⲑⲟⲥ ⲁⲩⲱ ⲧⲉⲧⲛⲁⲣ̅ ⲣⲣⲟ’ ⲙⲛ̅ ⲡⲣ̅ⲣⲟ ⲉ‐ <text:line-break/><text:span text:style-name="T1"> </text:span><text:span text:style-name="T2">(145/15) </text:span> ⲧⲉⲧⲛ̅ⲧⲏⲧ’ ⲛⲙ̅ⲙⲁϥ’ ⲉϥⲧⲏⲧ’ ⲛⲙ̅ⲙⲏⲧⲛ̅ ϫⲓⲛ ⲧⲉⲛⲟⲩ ϣⲁ <text:line-break/><text:span text:style-name="T1"> </text:span><text:span text:style-name="T2">(145/16) </text:span> ⲉⲛ̣[ⲉ]ϩ ⲛ̅ⲁⲛⲉϩ ϩⲁⲙⲏⲛ <text:line-break/><text:span text:style-name="T1"> </text:span><text:span text:style-name="T2">(145/17) </text:span> 6 <text:line-break/><text:span text:style-name="T1"> </text:span><text:span text:style-name="T2">(145/18) </text:span> ]ⲡϫⲱⲙⲉ ⲛ̅ⲑⲱⲙⲁⲥ[ <text:line-break/><text:span text:style-name="T1"> </text:span><text:span text:style-name="T2">(145/19) </text:span> ]ⲡ̣ⲁⲑⲗⲏⲧⲏⲥ ⲉϥⲥϩⲁⲓ̈[ <text:line-break/><text:span text:style-name="T1"> </text:span><text:span text:style-name="T2">(145/20) </text:span> ]ⲛ̣̅ⲛ̅ⲧⲉⲗⲉⲓⲟⲥ[ <text:line-break/><text:span text:style-name="T1"> </text:span><text:span text:style-name="T2">(145/21) </text:span> 6 <text:line-break/><text:span text:style-name="T1"> </text:span><text:span text:style-name="T2">(145/22) </text:span> ]ⲁⲣⲓ ⲡⲁⲙⲉⲉⲩⲉ ϩⲱ ⲛⲁⲥⲛⲏⲩ[ <text:line-break/><text:span text:style-name="T1"> </text:span><text:span text:style-name="T2">(145/23) </text:span> ]ϩ̣[ⲛ̅] ⲛⲉⲧⲛ̅ⲡⲣⲟⲥⲉⲩⲭⲏ’[ <text:line-break/><text:span text:style-name="T1"> </text:span><text:span text:style-name="T2">(145/24) </text:span> ]ⲉ[ⲓ]ⲣⲏⲛⲏ ⲧⲟⲓⲥ ⲁⲅⲓⲟⲓⲥ[ <text:line-break/><text:span text:style-name="T1"> </text:span><text:span text:style-name="T2">(145/25) </text:span> ⲙⲛ̅ ⲛⲓⲡⲛⲉⲩⲙⲁⲧⲓⲕⲟⲥ <text:line-break/><text:span text:style-name="T1"> </text:span><text:span text:style-name="T2">(145/26) </text:span> §ⲟⲩⲟⲉⲓ ⲛⲏⲧⲛ̅ ⲉⲃⲟⲗ ϩⲓⲧⲟⲟⲧϥ ⲙ̅ⲡⲕⲁ’ⲧ ⲉⲧⲕⲱⲧⲉ ϩⲛ̅ <text:line-break/><text:span text:style-name="T1"> </text:span><text:span text:style-name="T2">(145/27) </text:span> ⲛⲉⲧⲛ̣̅ⲙⲉⲉⲩⲉ §ⲟⲩⲟⲉⲓ ⲛⲏⲧⲛ̅ ⲛ̅ⲧⲟⲟⲧϥ̅ ⲙ̅ⲡⲙⲟⲩϩ̣ <text:line-break/><text:span text:style-name="T1"> </text:span><text:span text:style-name="T2">(145/28) </text:span> ⲉⲧϩ[ⲛ̅] ⲧⲏⲛⲉ ϫⲉ ϥⲛⲁⲩⲱ’ⲙ ⲛ̅ⲛⲉⲧⲛ̅ⲥⲁⲣ’ⲝ ϩⲛ̅ ⲟⲩⲱⲛϩ <text:line-break/><text:span text:style-name="T1"> </text:span><text:span text:style-name="T2">(145/29) </text:span> ⲉⲃⲟ’ⲗ ⲁⲩⲱ ϥⲛⲁⲡⲱϩ ⲛ̅ⲛⲉⲧⲛ̅ⲯⲩⲭⲟⲟⲩ’ⲉ ϩⲛ̅ ⲟⲩ‐ <text:line-break/><text:span text:style-name="T1"> </text:span><text:span text:style-name="T2">(145/30) </text:span> ϩⲱⲡ ⲛ̣̅ϥⲥⲃ̅ⲧⲉ ⲧⲏⲛⲉ ϩⲣⲁⲓ̈ ϩⲛ̅ ⲛⲉⲧⲛ̅ⲉⲣⲏ’ⲩ §ⲟⲩⲟ̣ⲓ̣̈ [ⲛ]ⲏ̣‐ <text:line-break/><text:span text:style-name="T1"> </text:span><text:span text:style-name="T2">(145/31) </text:span> ⲧⲛ̅ ⲛ̅ⲁⲓⲭⲙⲁⲗⲱⲧⲟⲥ ϫⲉ ⲧⲉⲧⲛ̅ⲙⲏ’ⲣ ϩⲛ̅ ⲛ̅ⲥⲡⲏⲗ[ⲁⲓ]‐ <text:line-break/><text:span text:style-name="T1"> </text:span><text:span text:style-name="T2">(145/32) </text:span> ⲟ’ⲛ ⲧⲉⲧⲛ̅ⲥⲱⲃⲉ ⲉⲧⲉⲧⲛ̅ⲣⲁϣⲉ ϩⲣⲁⲓ̈ ϩⲛ̅ ⲛ̅ⲥⲱⲃ[ⲉ] <text:line-break/><text:span text:style-name="T1"> </text:span><text:span text:style-name="T2">(145/33) </text:span> ⲛ̅ⲗⲓⲃⲉ ⲧⲉⲧⲛ̅ⲣ̅ⲛⲟⲉⲓ ⲁⲛ ⲙ̅ⲡⲉⲧⲛ̅ⲧⲁⲕⲟ ⲟⲩⲧⲉ ⲧ[ⲉ]‐ <text:line-break/><text:soft-page-break/><text:span text:style-name="T1"> </text:span><text:span text:style-name="T2">(145/34) </text:span> ⲧⲛ̅ⲣ̅ⲛⲟⲉⲓ ⲁ’ⲛ ϩⲛ̅ ⲛⲉⲧⲉⲧⲛ̅〈ⲛ̅〉ϩⲏⲧⲟⲩ ⲟⲩⲧⲉ ⲙ̅ⲡ̣[ⲉⲧ]ⲛ̣̅‐ <text:line-break/><text:span text:style-name="T1"> </text:span><text:span text:style-name="T2">(145/35) </text:span> ⲙ̣̅ⲙⲉ ϫⲉ ⲧⲉⲧⲛ̅ϣⲟⲟ’ⲡ ϩⲙ̅ ⲡⲕⲁⲕ’ⲉ ⲙⲛ̅ ⲡⲙⲟ̣[ⲩ] <text:line-break/><text:span text:style-name="T1"> </text:span><text:span text:style-name="T2">(145/36) </text:span> ⲁⲗⲗⲁ ⲉⲧⲉⲧⲛ̅ⲧⲁϩⲉ ϩⲙ̅ ⲡⲕⲱϩ’ⲧ ⲁⲩⲱ ⲧⲉⲧⲛ̣̅[ⲙⲉϩ] <text:line-break/><text:span text:style-name="T1"> </text:span><text:span text:style-name="T2">(145/37) </text:span> ⲛ̅ⲥⲓϣ’ⲉ ⲉⲣⲉ ⲡⲉⲧⲛ̅ϩⲏ’ⲧ ⲡⲟϣⲥ̅ ⲉⲣⲱⲧⲛ̅ ⲉⲧⲃⲉ ⲡ[ⲙ]ⲟ̣ⲩϩ <text:line-break/><text:span text:style-name="T1"> </text:span><text:span text:style-name="T2">(145/38) </text:span> ⲉ̣ⲧ̣[ϩ]ⲛ̅ ⲧⲏⲛ’ⲉ ⲁⲩⲱ ϥϩⲟⲗϭ ⲛⲏⲧⲛ̅ ⲛ̅ϭⲓ ⲡⲕⲗⲟ ⲙⲛ̣̅ <text:line-break/><text:span text:style-name="T1"> </text:span><text:span text:style-name="T2">(145/39) </text:span> ⲧⲡⲗⲏⲅⲏ ⲛ̅ⲛⲉⲧⲛ̅ϫⲁϫ’ⲉ ⲁⲩⲱ ⲡⲕⲁⲕⲉ ⲁϥϣⲁⲉ ⲛⲏ‐ <text:line-break/><text:span text:style-name="T1"> </text:span><text:span text:style-name="T2">(145/40) </text:span> ⲧⲛ̅ ⲛ̅ⲑⲉ ⲙ̅ⲡⲟⲩⲟⲉⲓ’ⲛ ⲧⲉⲧⲛⲙ̅ⲛ̅ⲧⲣⲙ̅ϩⲉ ⲅⲁ’ⲣ ⲁⲧⲉⲧⲛ̅ <text:line-break/><text:span text:style-name="T1"> </text:span><text:span text:style-name="T2">(145/41) </text:span> ⲧⲁⲁⲥ ⲛ̅ⲧⲙ̅ⲛ̅ⲧ̅ϩⲙϩ̅ⲁⲗ̅ ⲁⲧⲉⲧⲛ̅ⲉⲓⲣⲉ ⲛ̅ⲛⲉⲧⲛ̅ϩⲏ’ⲧ ⲛ̅‐ <text:line-break/><text:span text:style-name="T1"> </text:span><text:span text:style-name="T2">(145/42) </text:span> ϩⲏ’ⲧ ⲛ̅ⲕⲁⲕ’ⲉ ⲁⲩⲱ ⲛ̣ⲉⲧⲛ̅ⲙⲉⲉⲩ’ⲉ ⲁⲧⲉⲧⲛ̅ⲧⲁⲁⲩ <text:line-break/><text:span text:style-name="T1"> </text:span><text:span text:style-name="T2">(145/43) </text:span> ⲛ̅ⲧⲙⲛ̅ⲧⲥⲉϭ’ⲉ ⲁⲩⲱ ⲁⲧⲉⲧⲛ̅ⲙⲟⲩϩ ⲛ̅ⲛⲉⲧⲛ̅ⲙⲉ‐ <text:line-break/><text:span text:style-name="T1"> </text:span><text:span text:style-name="T2">(145/44) </text:span> ⲉ[ⲩ]ⲉ̣ ϩⲛ̅ ⲡⲕⲁⲡⲛⲟ’ⲥ ⲙ̅ⲡⲕⲱϩ’ⲧ ⲉⲧϩⲛ̅ ⲧⲏⲛⲉ ⲁⲩ‐ <text:line-break/><text:span text:style-name="T1"> </text:span><text:span text:style-name="T2">(145/45) </text:span> ⲱ̣ [ⲁϥϩ]ⲱ̣’ⲡ ⲛ̅ϭⲓ ⲡⲉⲧⲛ̅ⲟⲩⲟⲉⲓⲛ’ⲉ ϩⲛ̅ ⲧⲕⲗⲟⲟⲗⲉ <text:line-break/><text:span text:style-name="T1"> </text:span><text:span text:style-name="T2">(145/46) </text:span> [ⲛ̅.... ⲁ]ⲩⲱ̣ ⲧϩⲃⲥⲱ ⲉ’ⲧⲧⲟ ϩⲓ ⲧⲏⲛⲉ ⲁⲧⲉⲧⲛⲡ̣[ ]‐ <text:line-break/><text:span text:style-name="T1"> </text:span><text:span text:style-name="T2">(145/47) </text:span> [.........]ⲣ̣’ⲟ̣ϥ̣ ⲁⲩⲱ ⲁⲩⲣ̅ⲕⲁⲧⲉⲭⲉ ⲙ̅ⲙⲱ[ⲧⲛ̅ ϩⲓ]‐ <text:line-break/><text:span text:style-name="T1"> </text:span><text:span text:style-name="T2">(145/48) </text:span> [ⲧⲛ̅] ⲑⲉⲗ[ⲡⲓⲥ ⲉⲧ]ϣⲟⲟ’ⲡ ⲁⲛ ⲁⲩⲱ̣ ⲛ̣[ⲓ]ⲙ ⲡⲉⲛⲧ[ⲁⲧⲉ]‐ <text:line-break/><text:span text:style-name="T1"> </text:span><text:span text:style-name="T2">(145/49) </text:span> [ⲧⲛ̅]ⲡⲓⲥⲧ[ⲉⲩⲉ] ⲉ̣ⲣ’ⲟϥ ⲧⲉⲧⲛ̅ⲥⲟ̣ⲟ̣[ⲩⲛ ⲁⲛϫⲉ ⲧⲉⲧⲛ̅]‐ <text:line-break/><text:span text:style-name="T1"> </text:span><text:span text:style-name="T2">(145/50) </text:span> [ϣⲟ̣ⲟⲡ ⲧⲏⲣⲧⲛ̅ ϩⲛ̅ ⲛⲉⲧ[.................]‐ <text:line-break/><text:span text:style-name="T1"> </text:span><text:span text:style-name="T2">(145/51) </text:span> [..]ⲟⲩ ⲙ̅ⲙⲱⲧⲛ̅ ϩⲱⲥ ⲉⲧ̣[ⲉⲧ’ⲛ̅..............] 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2:12:16.621719100</meta:creation-date>
    <dc:date>2026-03-24T12:21:33.548044600</dc:date>
    <meta:editing-duration>PT3M14S</meta:editing-duration>
    <meta:editing-cycles>2</meta:editing-cycles>
    <meta:generator>LibreOffice/26.2.1.2$Windows_X86_64 LibreOffice_project/620$Build-2</meta:generator>
    <meta:document-statistic meta:table-count="0" meta:image-count="0" meta:object-count="0" meta:page-count="113" meta:paragraph-count="14" meta:word-count="33646" meta:character-count="228626" meta:non-whitespace-character-count="179587"/>
  </office:meta>
</office:document-meta>
</file>