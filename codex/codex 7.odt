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style:font-name="Antinoou"/>
    </style:style>
    <style:style style:name="P2" style:family="paragraph" style:parent-style-name="Text_20_body">
      <style:text-properties style:font-name="Antinoou"/>
    </style:style>
    <style:style style:name="P3" style:family="paragraph" style:parent-style-name="Standard">
      <style:paragraph-properties fo:break-before="page"/>
      <style:text-properties style:font-name="Antinoou"/>
    </style:style>
    <style:style style:name="P4" style:family="paragraph" style:parent-style-name="Standard">
      <style:paragraph-properties fo:break-before="page"/>
      <style:text-properties style:font-name="Antinoou" officeooo:paragraph-rsid="0011f82b"/>
    </style:style>
    <style:style style:name="P5" style:family="paragraph" style:parent-style-name="Text_20_body">
      <style:text-properties style:font-name="Antinoou" officeooo:paragraph-rsid="0011f82b"/>
    </style:style>
    <style:style style:name="P6" style:family="paragraph" style:parent-style-name="Standard">
      <style:text-properties style:font-name="Antinoou" officeooo:paragraph-rsid="0011f82b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fo:font-size="12pt" fo:font-weight="bold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 codex VII ) The Paraphrase of Shem</text:p>
      <text:p text:style-name="P2"><text:span text:style-name="T1"> </text:span><text:span text:style-name="T2">(1/1) </text:span> ⲧⲡⲁⲣⲁⲫⲣⲁⲥⲓⲥ ⲛ̅ⲥⲏⲉⲙ· <text:line-break/><text:span text:style-name="T1"> </text:span><text:span text:style-name="T2">(1/2) </text:span> [ⲧ]ⲡⲁⲣⲁⲫⲣⲁⲥⲓⲥ ⲉⲣϣⲱⲡⲉ ⲉⲧⲃⲉ <text:line-break/><text:span text:style-name="T1"> </text:span><text:span text:style-name="T2">(1/3) </text:span> ⲡ̅ⲛ̅ⲁ̅ ⲛ̅ⲁⲧⲉⲛⲛⲏⲧⲟⲛ· ⲁⲛⲟⲕ <text:line-break/><text:span text:style-name="T1"> </text:span><text:span text:style-name="T2">(1/4) </text:span> ⲥⲏⲉⲙ· ⲛⲉⲛⲧⲁϥϭⲟⲗⲡⲟⲩ ⲛⲁⲓ̈ <text:line-break/><text:span text:style-name="T1"> </text:span><text:span text:style-name="T2">(1/5) </text:span> ⲉⲃⲟⲗ ⲛ̅ϭⲓ ⲇⲉⲣⲇⲉⲕⲉⲁ〈ⲥ〉· ⲕⲁⲧⲁ <text:line-break/><text:span text:style-name="T1"> </text:span><text:span text:style-name="T2">(1/6) </text:span> ⲡⲟⲩⲱϣ ⲙ̅ⲡⲙⲉⲅⲉⲑⲟⲥ · ⲁ‐ <text:line-break/><text:span text:style-name="T1"> </text:span><text:span text:style-name="T2">(1/7) </text:span> ⲡⲁⲙⲉⲉⲩⲉ ⲉⲧ’ϩ̅ⲙ̅ ⲡⲁⲥⲱⲙⲁ <text:line-break/><text:span text:style-name="T1"> </text:span><text:span text:style-name="T2">(1/8) </text:span> ⲧⲟⲣⲡ̅ⲧ̅’̅ ⲉⲃⲟⲗ ϩ̅ⲛ̅ ⲧⲁⲅⲉⲛⲉⲁ· ⲁϥ‐ <text:line-break/><text:span text:style-name="T1"> </text:span><text:span text:style-name="T2">(1/9) </text:span> ϫⲓⲧ’ ⲉϩⲣⲁⲓ̈ ⲉⲡϫⲓⲥⲉ ⲛ̅ⲧⲕⲧⲓⲥⲓⲥ <text:line-break/><text:span text:style-name="T1"> </text:span><text:span text:style-name="T2">(1/10) </text:span> ⲉϥϩⲏⲛ ⲉϩⲟⲩⲛ ⲉⲡⲟⲩⲟⲉⲓⲛ ⲡⲁⲓ̈ <text:line-break/><text:span text:style-name="T1"> </text:span><text:span text:style-name="T2">(1/11) </text:span> ⲉⲣⲡⲓⲣⲉ ⲉϫ̅ⲛ̅ ⲧⲟⲓⲕⲟⲩⲙⲉⲛⲏ ⲧⲏ‐ <text:line-break/><text:span text:style-name="T1"> </text:span><text:span text:style-name="T2">(1/12) </text:span> ⲣ̅ⲥ̅ ⲙ̅ⲡⲙⲁ ⲉⲧ̅ⲙ̅ⲙⲁⲩ· ⲙ̅ⲡⲓⲛⲁⲩ <text:line-break/><text:span text:style-name="T1"> </text:span><text:span text:style-name="T2">(1/13) </text:span> ⲉⲉⲓⲛⲉ ⲛ̅ⲕⲁϩ ⲁⲗⲗⲁ ⲟⲩⲟⲉⲓⲛ ⲡⲉ· <text:line-break/><text:span text:style-name="T1"> </text:span><text:span text:style-name="T2">(1/14) </text:span> ⲁⲩⲱ ⲁϥⲡⲱϣ ⲛ̅ϭⲓ ⲡⲁⲙⲉⲉⲩⲉ <text:line-break/><text:span text:style-name="T1"> </text:span><text:span text:style-name="T2">(1/15) </text:span> ⲉⲃⲟⲗ ϩ̅ⲙ̅ ⲡⲥⲱⲙⲁ ⲙ̅ⲡⲕⲁⲕⲉ· ϩⲱⲥ <text:line-break/><text:span text:style-name="T1"> </text:span><text:span text:style-name="T2">(1/16) </text:span> ⲉϣϫⲉ ϩ̅ⲛ̅ ⲟⲩϩ̅ⲓ̅ⲛⲏⲃ· ⲁⲉⲓⲥⲱⲧ̅ⲙ̅ <text:line-break/><text:span text:style-name="T1"> </text:span><text:span text:style-name="T2">(1/17) </text:span> ⲉⲩϩⲣⲟⲟⲩ ⲉϥϫⲱ ⲙ̅ⲙⲟⲥ ⲛⲁⲓ̈· <text:line-break/><text:span text:style-name="T1"> </text:span><text:span text:style-name="T2">(1/18) </text:span> ϫⲉ ⲥⲏⲉⲙ ⲉⲡⲓⲇⲏ ⲛ̅ⲧⲕ ⲟⲩⲉⲃⲟⲗ <text:line-break/><text:span text:style-name="T1"> </text:span><text:span text:style-name="T2">(1/19) </text:span> ϩ̅ⲛ̅ ⲟⲩⲇⲩⲛⲁⲙⲓⲥ ⲛ̅ⲁⲕⲉⲣⲁⲓⲟⲥ· <text:line-break/><text:span text:style-name="T1"> </text:span><text:span text:style-name="T2">(1/20) </text:span> ⲁⲩⲱ ⲛ̅ⲧ̅ⲕ̅ ⲡϣ̅ⲣⲡ̅ ⲛ̅ϣⲱⲡⲉ ϩ̅ⲓ̅ <text:line-break/><text:span text:style-name="T1"> </text:span><text:span text:style-name="T2">(1/21) </text:span> ϫ̅ⲙ̅ ⲡⲕⲁϩ· ⲥⲱⲧ̅ⲙ̅ ⲛ̅ⲕ̅ⲣ̅ⲛⲟⲉⲓ <text:line-break/><text:span text:style-name="T1"> </text:span><text:span text:style-name="T2">(1/22) </text:span> ⲛ̅ⲛⲉϯⲛⲁϫⲟⲟⲩ ⲛⲁⲕ ⲛ̅ϣⲟⲣ̅ⲡ̅ <text:line-break/><text:span text:style-name="T1"> </text:span><text:span text:style-name="T2">(1/23) </text:span> ⲉⲧⲃⲉ ⲛ̅ⲛⲟϭ ⲛ̅ⲇⲩⲛⲁⲙⲓⲥ ⲛⲁⲓ̈ <text:line-break/><text:span text:style-name="T1"> </text:span><text:span text:style-name="T2">(1/24) </text:span> ⲛⲉⲩϣⲟⲟⲡ ϩ̅ⲛ̅ ⲛ̅ϣⲟⲣ̅ⲡ̅ ϩⲁⲧⲉ‐ <text:line-break/><text:span text:style-name="T1"> </text:span><text:span text:style-name="T2">(1/25) </text:span> ϩⲏ ⲉⲙⲡⲁϯⲟⲩⲱⲛ̅ϩ̅ ⲉⲃⲟⲗ· ⲛⲉⲩ‐ <text:line-break/><text:span text:style-name="T1"> </text:span><text:span text:style-name="T2">(1/26) </text:span> ⲛ̅ ⲟⲩⲟⲉⲓⲛ ϣⲟⲟⲡ ⲙ̅ⲛ̅ ⲟⲩⲕⲁⲕⲉ <text:line-break/><text:span text:style-name="T1"> </text:span><text:span text:style-name="T2">(1/27) </text:span> ⲁⲩⲱ ⲛⲉⲩⲛ̅ ⲟⲩⲡ̅ⲛ̅ⲁ̅ ϩ̅ⲛ̅ ⲧⲟⲩ <text:line-break/><text:span text:style-name="T1"> </text:span><text:span text:style-name="T2">(1/28) </text:span> ⲙⲏⲧⲉ· ⲉⲡⲓⲇⲏ ⲁⲧⲉⲕⲛⲟⲩⲛⲉ <text:line-break/><text:span text:style-name="T1"> </text:span><text:span text:style-name="T2">(1/29) </text:span> ϩⲉ ⲉϩⲣⲁⲓ̈ ⲉⲧ̅ⲃ̅ϣⲉ· ⲡⲁⲓ̈ ⲛⲉϥϣⲟ‐ <text:line-break/><text:span text:style-name="T1"> </text:span><text:span text:style-name="T2">(1/30) </text:span> ⲟⲡ ⲙ̅ⲡ̅ⲛ̅ⲁ̅ ⲛ̅ⲁⲅⲉⲛⲛⲏⲧⲟⲛ· ϯⲣ̅‐ <text:line-break/><text:span text:style-name="T1"> </text:span><text:span text:style-name="T2">(1/31) </text:span> ⲫⲁⲛⲉⲣⲟⲩ ⲛⲁⲕ ⲛ̅ⲧⲁⲕⲣⲓⲃⲓⲁ ⲛ̅‐ <text:line-break/><text:span text:style-name="T1"> </text:span><text:span text:style-name="T2">(1/32) </text:span> ⲛ̅ⲇⲩⲛⲁⲙⲓⲥ· ⲡⲟⲩⲟⲉⲓⲛ ⲛⲉϥ‐ <text:line-break/><text:span text:style-name="T1"> </text:span><text:span text:style-name="T2">(1/33) </text:span> ϣⲟⲟⲡ ⲙ̅ⲙⲉⲉⲩⲉ ⲉϥⲙⲉϩ ϩ̅ⲛ̅ <text:line-break/><text:span text:style-name="T1"> </text:span><text:span text:style-name="T2">(1/34) </text:span> ⲟⲩⲥⲱⲧ̅ⲙ̅ ⲙ̅ⲛ̅ ⲟⲩⲗⲟⲅⲟⲥ· ⲛⲉⲩ <text:line-break/><text:span text:style-name="T1"> </text:span><text:span text:style-name="T2">(1/35) </text:span> ⲥⲟⲟⲩϩ ⲉϩⲟⲩⲛ ⲉⲩⲉⲓⲇⲟⲥ ⲛ̅‐ <text:line-break/><text:span text:style-name="T1"> </text:span><text:span text:style-name="T2">(1/36) </text:span> ⲟⲩⲱⲧ’· ⲁⲩⲱ ⲡⲕⲁⲕⲉ ⲛⲉϥⲟ‐ <text:line-break/><text:span text:style-name="T1"> </text:span><text:span text:style-name="T2">(2/1) </text:span> ⲛ̅ⲧⲏⲟⲩ ϩ̅ⲛ̅ ϩ̅ⲛ̅ⲙⲟⲩⲉⲓⲏⲉⲩ[ <text:line-break/><text:span text:style-name="T1"> </text:span><text:span text:style-name="T2">(2/2) </text:span> ⲡⲁⲓ̈ ⲛⲉⲩⲛ̅ⲧⲁϥ ⲙ̅ⲡⲛⲟⲩⲥ ⲉ[ⲧ] <text:line-break/><text:span text:style-name="T1"> </text:span><text:span text:style-name="T2">(2/3) </text:span> ϭⲁⲗⲉ ⲛ̅ⲛⲟⲩⲕⲱϩ̅ⲧ̅’̅ ⲉϥϣⲧ̅ⲣ̅ⲧⲱⲣ <text:line-break/><text:span text:style-name="T1"> </text:span><text:span text:style-name="T2">(2/4) </text:span> ⲁⲩⲱ ⲡ̅ⲛ̅ⲁ̅ ⲉⲧ’ϩ̅ⲛ̅ ⲧⲟⲩⲙⲏⲧⲉ <text:line-break/><text:span text:style-name="T1"> </text:span><text:span text:style-name="T2">(2/5) </text:span> ⲛⲉⲩⲟⲩⲟⲉⲓⲛ ⲡⲉ ⲛ̅ⲣ̅ⲙ̅ⲣⲁϣ ⲉϥ‐ <text:line-break/><text:span text:style-name="T1"> </text:span><text:span text:style-name="T2">(2/6) </text:span> ⲑ̅ⲃ̅ⲃⲓⲏⲟⲩ· ⲛⲁⲓ̈ ⲛⲉ ⲧϣⲟⲙⲧⲉ ⲛ̅‐ <text:line-break/><text:span text:style-name="T1"> </text:span><text:span text:style-name="T2">(2/7) </text:span> ⲛⲟⲩⲛⲉ· ⲛⲉⲩⲟ̅ ⲛ̅ⲣ̅ⲣⲟ ϩⲣⲁⲓ̈ ⲛ̅ϩⲏ‐ <text:line-break/><text:span text:style-name="T1"> </text:span><text:span text:style-name="T2">(2/8) </text:span> ⲧⲟⲩ ⲟⲩⲁⲁⲩ· ⲁⲩⲱ ⲛⲉⲩϩⲟⲃⲉⲥ ⲉ‐ <text:line-break/><text:span text:style-name="T1"> </text:span><text:span text:style-name="T2">(2/9) </text:span> ⲛⲉⲩⲉⲣⲏⲩ· ⲧⲟⲩⲉⲓ ⲧⲟⲩⲉ̅ⲓ̅ ϩ̅ⲛ̅ <text:line-break/><text:span text:style-name="T1"> </text:span><text:span text:style-name="T2">(2/10) </text:span> ⲧⲉⲥⲇⲩⲛⲁⲙⲓⲥ· ⲡ{ⲥ}ⲟⲩⲟⲉⲓⲛ <text:line-break/><text:span text:style-name="T1"> </text:span><text:span text:style-name="T2">(2/11) </text:span> ⲇⲉ ⲉⲡⲓⲇⲏ ⲛⲉⲩⲛ̅ⲧ̅ϥ̅ ⲟⲩⲛⲟϭ ⲛ̅‐ <text:line-break/><text:soft-page-break/><text:span text:style-name="T1"> </text:span><text:span text:style-name="T2">(2/12) </text:span> ⲇⲩⲛⲁⲙⲓⲥ· ⲛⲉϥⲥⲟⲟⲩⲛ ⲙ̅ⲡ̅ⲑ̅ⲃ̅‐ <text:line-break/><text:span text:style-name="T1"> </text:span><text:span text:style-name="T2">(2/13) </text:span> ⲃⲓⲟ ⲙ̅ⲡⲕⲁⲕⲉ ⲙ̅ⲛ̅ ⲧⲉϥⲙ̅ⲛⲧ’̅ⲁⲧⲁ‐ <text:line-break/><text:span text:style-name="T1"> </text:span><text:span text:style-name="T2">(2/14) </text:span> ⲝⲓⲁ· ϫⲉ ⲛⲉⲧⲛⲟⲩⲛⲉ ϣⲏϣ ⲉⲛ‐ <text:line-break/><text:span text:style-name="T1"> </text:span><text:span text:style-name="T2">(2/15) </text:span> ⲧⲁⲛϩⲱⲙⲁⲗⲓⲁ ⲇⲉ ⲙ̅ⲡⲕⲁⲕⲉ ⲛⲉⲥ‐ <text:line-break/><text:span text:style-name="T1"> </text:span><text:span text:style-name="T2">(2/16) </text:span> ⲟ̅ ⲛ̅ⲁⲛⲁⲓⲥⲑⲏⲧⲟⲥ ϫⲉ ⲙ̅ⲛ̅ ⲡⲉⲧ’‐ <text:line-break/><text:span text:style-name="T1"> </text:span><text:span text:style-name="T2">(2/17) </text:span> ϫⲟⲥⲉ ⲉⲣⲟϥ· ⲛ̅ⲧⲁⲣⲉϥϣϭ̅ⲙ̅ ϭⲟⲙ <text:line-break/><text:span text:style-name="T1"> </text:span><text:span text:style-name="T2">(2/18) </text:span> ⲇⲉ ⲛ̅ϥⲓ ⲉϩⲣⲁⲓ̈ ϩⲁ ⲧⲉϥⲕⲁϭⲓⲁ· ⲛⲉϥ‐ <text:line-break/><text:span text:style-name="T1"> </text:span><text:span text:style-name="T2">(2/19) </text:span> ϩⲟⲃⲉⲥ ⲡⲉ ϩ̅ⲙ̅ ⲡⲙⲟⲟⲩ· ⲁⲩⲱ ⲁ̣ϥ‐ <text:line-break/><text:span text:style-name="T1"> </text:span><text:span text:style-name="T2">(2/20) </text:span> ⲕⲓⲙ· ⲁⲩⲱ ⲉ̣ⲃ̣ⲟⲗ ⲙ̅ⲡϩⲣⲟⲟⲩ̣ ⲁ̣ϥ̣‐ <text:line-break/><text:span text:style-name="T1"> </text:span><text:span text:style-name="T2">(2/21) </text:span> ⲧ̅ⲣ̅ⲣⲓⲉ ⲛ̅ϭⲓ ⲡ̅ⲛⲁ̅· ⲁϥϫⲓⲥⲉ ⲙ̅ⲙⲟϥ <text:line-break/><text:span text:style-name="T1"> </text:span><text:span text:style-name="T2">(2/22) </text:span> ϣⲁ ϩⲣⲁⲓ̈ ⲉⲡⲉϥⲧⲟⲡⲟⲥ· ⲁⲩⲱ <text:line-break/><text:span text:style-name="T1"> </text:span><text:span text:style-name="T2">(2/23) </text:span> ⲁϥⲛⲁⲩ ⲉⲩⲛⲟϭ ⲙ̅ⲙⲟⲟⲩ ⲛ̅ⲕⲁ‐ <text:line-break/><text:span text:style-name="T1"> </text:span><text:span text:style-name="T2">(2/24) </text:span> ⲕⲉ· ⲁⲩⲱ ⲁϥⲣ̅ⲥⲓⲭⲁⲛⲉⲥⲑⲁⲓ ⲁⲩⲱ <text:line-break/><text:span text:style-name="T1"> </text:span><text:span text:style-name="T2">(2/25) </text:span> ⲡⲙⲉⲉⲩⲉ ⲛ̅ⲧⲉ ⲡ̅ⲛ̅ⲁ̅ ⲁϥⲉⲓⲱⲣ̅ⲙ̅ ⲉ‐ <text:line-break/><text:span text:style-name="T1"> </text:span><text:span text:style-name="T2">(2/26) </text:span> ⲡⲓⲧ̅ⲛ̅ ⲁϥⲛⲁⲩ ⲉⲡⲟⲩⲟⲉⲓⲛ ⲉⲧⲉ‐ <text:line-break/><text:span text:style-name="T1"> </text:span><text:span text:style-name="T2">(2/27) </text:span> ⲙ̅ⲛ̅ⲧⲉϥ ⲁⲣⲏϫ̅ϥ̅· ⲁⲩⲣ̅ⲁⲙⲉⲗⲉⲓ ⲇⲉ <text:line-break/><text:span text:style-name="T1"> </text:span><text:span text:style-name="T2">(2/28) </text:span> ⲉⲣⲟϥ ϩ̅ⲓ̅ⲧ̅ⲛ̅ ⲧⲛⲟⲩⲛⲉ ⲉⲑⲟⲟⲩ· ϩ̅ⲙ̅ <text:line-break/><text:span text:style-name="T1"> </text:span><text:span text:style-name="T2">(2/29) </text:span> ⲡⲟⲩⲱϣ ⲇⲉ ⲙ̅ⲡⲛⲟϭ ⲛ̅ⲟⲩⲟⲉⲓⲛ· <text:line-break/><text:span text:style-name="T1"> </text:span><text:span text:style-name="T2">(2/30) </text:span> ⲁϥⲡⲱⲣ̅ϫ̅ ⲛ̅ϭⲓ ⲡⲙⲟⲟⲩ ⲛ̅ⲕⲁⲕⲉ· <text:line-break/><text:span text:style-name="T1"> </text:span><text:span text:style-name="T2">(2/31) </text:span> ⲁⲩⲱ ⲁϥⲉ̅ⲓ̅ ⲉϩⲣⲁⲓ̈ ⲛ̅ϭⲓ ⲡⲕⲁⲕⲉ ⲉϥ‐ <text:line-break/><text:span text:style-name="T1"> </text:span><text:span text:style-name="T2">(2/32) </text:span> ϭⲟⲗⲉ ⲛ̅ⲧⲙ̅ⲛ̅ⲧ̅’̅ⲁⲧ’ⲥⲟⲟⲩⲛ ⲉⲑⲟ‐ <text:line-break/><text:span text:style-name="T1"> </text:span><text:span text:style-name="T2">(2/33) </text:span> ⲟⲩ· ϫⲉⲕⲁⲁⲥ ⲇⲉ ⲉⲣⲉⲡⲛⲟⲩⲥ <text:line-break/><text:span text:style-name="T1"> </text:span><text:span text:style-name="T2">(2/34) </text:span> ⲛⲁⲡⲱⲣ̅ϫ̅ ⲉⲣⲟϥ ϫⲉ ⲛⲉϥϣⲟⲩ <text:line-break/><text:span text:style-name="T1"> </text:span><text:span text:style-name="T2">(2/35) </text:span> ϣⲟⲩ ⲙ̅ⲙⲟϥ ⲛ̅ϩⲏⲧ̅ϥ̅· ⲛ̅ⲧⲁⲣⲉϥ <text:line-break/><text:span text:style-name="T1"> </text:span><text:span text:style-name="T2">(2/36) </text:span> ⲕⲓⲙ ⲇⲉ ⲙ̅ⲙⲟϥ ⲁϥⲟⲩⲱⲛ̅ϩ̅ ⲉⲃⲟⲗ <text:line-break/><text:span text:style-name="T1"> </text:span><text:span text:style-name="T2">(3/1) </text:span> ⲛ̣ⲁϥ ⲛ̅ϭⲓ ⲡⲟⲩⲟⲉⲓⲛ ⲙ̅ⲡ̅ⲡⲛ̅ⲁ̅· ⲛ̅‐ <text:line-break/><text:span text:style-name="T1"> </text:span><text:span text:style-name="T2">(3/2) </text:span> ⲧⲁⲣⲉϥⲛⲁⲩ ⲉⲣⲟϥ ⲁϥⲣ̅ ⲑⲁⲩⲙⲁ· <text:line-break/><text:span text:style-name="T1"> </text:span><text:span text:style-name="T2">(3/3) </text:span> ⲛⲉϥⲥⲟⲟⲩⲛ ⲁⲛ ϫⲉ ⲟⲩⲛ̅ ϭⲉ <text:line-break/><text:span text:style-name="T1"> </text:span><text:span text:style-name="T2">(3/4) </text:span> ⲇⲩⲛⲁⲙⲓⲥ ϫⲟⲥⲉ ⲉⲣⲟϥ· ⲛ̅ⲧⲁⲣⲉϥ <text:line-break/><text:span text:style-name="T1"> </text:span><text:span text:style-name="T2">(3/5) </text:span> ⲛⲁⲩ ⲇⲉ ϫⲉ ⲛⲉⲣⲉⲡⲉϥⲉⲓⲛⲉ ⲟ̅ ⲛ̅‐ <text:line-break/><text:span text:style-name="T1"> </text:span><text:span text:style-name="T2">(3/6) </text:span> ⲕⲁⲕⲉ ⲛ̅ⲛⲁϩⲣ̅ⲛ̅ ⲡ̅ⲛⲁ̅· ⲁϥϯ ⲧⲕⲁⲥ· <text:line-break/><text:span text:style-name="T1"> </text:span><text:span text:style-name="T2">(3/7) </text:span> ⲁⲩⲱ ϩⲣⲁⲓ̈ ϩ̅ⲙ̅ ⲡⲉϥϯ ⲧⲕⲁⲥ ⲁϥϫⲓ‐ <text:line-break/><text:span text:style-name="T1"> </text:span><text:span text:style-name="T2">(3/8) </text:span> ⲥⲉ ⲙ̅ⲡⲉϥⲛⲟⲩⲥ ⲉϩⲣⲁⲓ̈ ⲉⲡϫⲓⲥⲉ· <text:line-break/><text:span text:style-name="T1"> </text:span><text:span text:style-name="T2">(3/9) </text:span> ⲛ̅ⲛ̅ⲙ̅ⲙⲉⲗⲟⲥ ⲙ̅ⲡⲕⲁⲕⲉ· ⲡⲁⲓ̈ ⲛⲉϥ‐ <text:line-break/><text:span text:style-name="T1"> </text:span><text:span text:style-name="T2">(3/10) </text:span> ϣⲟⲟⲡ ⲛ̅ⲃⲁⲗ ⲙ̅ⲡⲥⲓϣⲉ ⲛ̅ⲧⲕⲁ‐ <text:line-break/><text:span text:style-name="T1"> </text:span><text:span text:style-name="T2">(3/11) </text:span> ϭⲓⲁ· ⲁϥⲧⲣⲉⲡⲉϥⲛⲟⲩⲥ ϫⲓ ⲉⲓⲛⲉ <text:line-break/><text:span text:style-name="T1"> </text:span><text:span text:style-name="T2">(3/12) </text:span> ϩ̅ⲛ̅ ⲟⲩⲙⲉⲗⲟⲥ ⲛ̅ⲛ̅ⲙ̅ⲙⲉⲣⲟⲥ ⲙ̅ⲡ̅‐ <text:line-break/><text:span text:style-name="T1"> </text:span><text:span text:style-name="T2">(3/13) </text:span> ⲡ̅ⲛ̅ⲁ̅· ⲉ〈ϥ〉ⲙⲉⲉⲩⲉ ϫⲉ ⲉϥⲉⲓⲁⲣ̅ⲙ̅ <text:line-break/><text:span text:style-name="T1"> </text:span><text:span text:style-name="T2">(3/14) </text:span> ⲛ̅ⲥⲁ ⲧⲉϥⲕⲁϭⲓⲁ· ϫⲉ ϥⲛⲁϭ̅ⲙ̅ ϭⲁⲙ <text:line-break/><text:span text:style-name="T1"> </text:span><text:span text:style-name="T2">(3/15) </text:span> ⲁϣⲱϣ ̅ⲛ̅ⲡ̅ⲛⲁ̅· ⲁⲗⲗⲁ ⲙ̅ⲡⲉϥ <text:line-break/><text:span text:style-name="T1"> </text:span><text:span text:style-name="T2">(3/16) </text:span> ⲉϣϭ̅ⲙ̅ ϭⲁⲙ· ⲛⲉϥⲟⲩⲱϣ ⲅⲁⲣ ⲁⲣ̅‐ <text:line-break/><text:span text:style-name="T1"> </text:span><text:span text:style-name="T2">(3/17) </text:span> ⲟⲩϩⲱⲃ ⲛ̅ⲁⲧ’ϭⲁⲙ· ⲁⲩⲱ ⲙ̅ⲡⲉϥ‐ <text:line-break/><text:span text:style-name="T1"> </text:span><text:span text:style-name="T2">(3/18) </text:span> ϣⲱⲡⲉ· ϣⲓⲛⲁ ⲇⲉ ϫⲉ ⲛⲉϥⲟⲩ‐ <text:line-break/><text:span text:style-name="T1"> </text:span><text:span text:style-name="T2">(3/19) </text:span> ⲱⲥ̅ϥ̅ ⲛ̅ϭⲓ ⲡⲛⲟⲩⲥ ⲙ̅ⲡⲕⲁⲕⲉ· ⲉ‐ <text:line-break/><text:span text:style-name="T1"> </text:span><text:span text:style-name="T2">(3/20) </text:span> ⲧⲉ ⲡⲃⲁⲗ ⲡⲉ ⲙ̅ⲡⲥⲓϣⲉ ⲛ̅ⲧⲕⲁϭⲓⲁ· <text:line-break/><text:span text:style-name="T1"> </text:span><text:span text:style-name="T2">(3/21) </text:span> ⲉⲡⲓⲇⲏ ⲁⲩⲕⲁⲁϥ ϩ̅ⲛ̅ ⲟⲩⲉⲓⲛⲉ ⲁ‐ <text:line-break/><text:span text:style-name="T1"> </text:span><text:span text:style-name="T2">(3/22) </text:span> ⲡⲟⲙⲉⲣⲟⲥ· ⲁϥϫⲓⲥⲉ ⲁⲩⲱ ⲁϥⲣ̅ⲟⲩ‐ <text:line-break/><text:soft-page-break/><text:span text:style-name="T1"> </text:span><text:span text:style-name="T2">(3/23) </text:span> ⲟⲉⲓⲛ ϩ̅ⲛ̅ ⲟⲩⲟⲉⲓⲛ ⲛ̅ⲕⲱϩ̅ⲧ’̅ ⲉϫ̅ⲛ̅ <text:line-break/><text:span text:style-name="T1"> </text:span><text:span text:style-name="T2">(3/24) </text:span> ⲉⲙ̅ⲛ̅ⲧⲉ ⲧⲏⲣ̅ϥ̅· ϫⲉⲕⲁⲁⲥ ⲉϥⲛⲁ‐ <text:line-break/><text:span text:style-name="T1"> </text:span><text:span text:style-name="T2">(3/25) </text:span> ϭⲱⲗ̅ⲡ̅ ⲉⲃⲟⲗ ⲛ̅ϭⲓ ⲡϣⲱϣ ⲙ̅ⲡⲟⲩ‐ <text:line-break/><text:span text:style-name="T1"> </text:span><text:span text:style-name="T2">(3/26) </text:span> ⲟⲉⲓⲛ 〈ⲛ̅〉ⲁⲧ’ϣⲧⲁ· ⲁϥⲣ̅ⲱ̅ⲫⲉⲗⲉⲓ <text:line-break/><text:span text:style-name="T1"> </text:span><text:span text:style-name="T2">(3/27) </text:span> ⲅⲁⲣ ⲛ̅ϭⲓ ⲡ̅ⲛ̅ⲁ̅ ⲉⲃⲟⲗ ϩ̅ⲛ̅ ⲉⲓⲇⲟⲥ ⲛⲓⲙ <text:line-break/><text:span text:style-name="T1"> </text:span><text:span text:style-name="T2">(3/28) </text:span> ⲛ̅ⲧⲉ ⲡⲕⲁⲕⲉ· ⲉⲃⲟⲗ ϫⲉ ⲁϥⲟⲩ‐ <text:line-break/><text:span text:style-name="T1"> </text:span><text:span text:style-name="T2">(3/29) </text:span> ⲱⲛ̅ϩ̅ ⲉⲃⲟⲗ ϩ̅ⲙ̅ ⲡⲉϥⲙⲉⲅⲉⲑⲟⲥ· <text:line-break/><text:span text:style-name="T1"> </text:span><text:span text:style-name="T2">(3/30) </text:span> ⲁⲩⲱ ⲁϥϭⲱⲗ̅ⲡ̅ ⲉⲃⲟⲗ ⲛ̅ϭⲓ ⲡⲟⲩⲟ‐ <text:line-break/><text:span text:style-name="T1"> </text:span><text:span text:style-name="T2">(3/31) </text:span> ⲉⲓⲛ ⲉⲧ’ϫⲟⲥⲉ ⲉⲧⲉ ⲙ̅ⲙ̅ⲛ̅ⲧ̅ϥ̅ ⲁ‐ <text:line-break/><text:span text:style-name="T1"> </text:span><text:span text:style-name="T2">(3/32) </text:span> ⲣⲏϫ̅ϥ̅· ⲛⲉϥϣⲟⲟⲡ ⲅⲁⲣ ϩ̅ⲛ̅ ⲟⲩ‐ <text:line-break/><text:span text:style-name="T1"> </text:span><text:span text:style-name="T2">(3/33) </text:span> ⲛⲟϭ ⲛ̅ⲣⲁϣⲉ· ⲁϥⲟⲩⲱϣ ⲉϭⲟⲗ <text:line-break/><text:span text:style-name="T1"> </text:span><text:span text:style-name="T2">(3/34) </text:span> ⲡ̅ϥ̅ ⲉⲃⲟⲗ ⲙ̅ⲡ̅ⲡ̅ⲛⲁ̅· ⲁⲩⲱ ⲡⲓⲛⲉ <text:line-break/><text:span text:style-name="T1"> </text:span><text:span text:style-name="T2">(3/35) </text:span> ⲙ̅ⲡⲟⲩⲟⲉⲓⲛ ⲉⲧ’ϫⲟⲥⲉ ⲁϥⲟⲩⲱ‐ <text:line-break/><text:span text:style-name="T1"> </text:span><text:span text:style-name="T2">(3/36) </text:span> ⲛ̅ϩ̅ ⲉⲃⲟⲗ ⲙ̅ⲡ̅ⲡ̅ⲛⲁ̅ ⲛ̅ⲁⲅⲉⲛⲛⲏⲧⲟⲛ <text:line-break/><text:span text:style-name="T1"> </text:span><text:span text:style-name="T2">(4/1) </text:span> ⲁⲛⲟⲕ ⲁⲉⲓⲟⲩⲱⲛ̅ϩ̅ ⲉⲃⲟⲗ· ⲁⲛ̣[ⲟⲕ] <text:line-break/><text:span text:style-name="T1"> </text:span><text:span text:style-name="T2">(4/2) </text:span> ⲡⲉ ⲡϣⲏⲣⲉ ⲙ̅ⲡⲟⲩⲟⲉⲓⲛ ⲛ̅‐ <text:line-break/><text:span text:style-name="T1"> </text:span><text:span text:style-name="T2">(4/3) </text:span> ⲛⲁⲧ’ϫⲱϩ̅ⲙ̅ ⲉⲧⲉ ⲙ̅ⲙ̅ⲛ̅ⲧⲉϥ ⲁ‐ <text:line-break/><text:span text:style-name="T1"> </text:span><text:span text:style-name="T2">(4/4) </text:span> ⲣⲏϫ̅ϥ̅· ⲁⲉⲓⲟⲩⲱⲛ̅ϩ̅ ⲉⲃⲟⲗ ϩ̅ⲙ̅ ⲡⲓ‐ <text:line-break/><text:span text:style-name="T1"> </text:span><text:span text:style-name="T2">(4/5) </text:span> ⲛⲉ ⲙ̅ⲡ̅ⲡ̅ⲛⲁ̅· ⲁⲛⲟⲕ ⲅⲁⲣ ⲡⲉ ⲧⲁ‐ <text:line-break/><text:span text:style-name="T1"> </text:span><text:span text:style-name="T2">(4/6) </text:span> ⲕⲧⲓⲛ ⲙ̅ⲡⲟⲩⲟⲉⲓⲛ ⲛ̅ⲕⲁⲑⲟⲗⲓⲕⲟⲛ <text:line-break/><text:span text:style-name="T1"> </text:span><text:span text:style-name="T2">(4/7) </text:span> ⲁⲩⲱ ⲡⲉϥⲟⲩⲱⲛ̅ϩ̅ ⲉⲃⲟⲗ ⲛⲁⲓ̈ <text:line-break/><text:span text:style-name="T1"> </text:span><text:span text:style-name="T2">(4/8) </text:span> ϣⲓⲛⲁ ϫⲉ ⲛⲉϥⲣ̅ϩⲩⲡⲟⲙⲓⲛⲉ ⲛ̅‐ <text:line-break/><text:span text:style-name="T1"> </text:span><text:span text:style-name="T2">(4/9) </text:span> ϭⲓ ⲡⲛⲟⲩⲥ ⲙ̅ⲡⲕⲁⲕⲉ ϩ̅ⲛ̅ⲛ ⲉⲙ̅ⲛ̅‐ <text:line-break/><text:span text:style-name="T1"> </text:span><text:span text:style-name="T2">(4/10) </text:span> ⲧⲉ· ⲁⲡⲕⲁⲕⲉ ⲅⲁⲣ ⲧ̅ⲛ̅ⲧⲱⲛ̅ϥ̅ ⲁⲡ̅ϥ̅‐ <text:line-break/><text:span text:style-name="T1"> </text:span><text:span text:style-name="T2">(4/11) </text:span> ⲛⲟⲩⲥ ϩ̅ⲛ̅ⲛ ⲟⲩⲙⲉⲣⲟⲥ ⲛ̅ⲧⲉ ⲛ̅‐ <text:line-break/><text:span text:style-name="T1"> </text:span><text:span text:style-name="T2">(4/12) </text:span> ⲙⲉⲗⲟⲥ· ⲁⲛⲟⲕ ⲥⲏⲉⲙ ⲛ̅ⲧⲁⲣ〈ⲓ̈〉ⲟⲩ <text:line-break/><text:span text:style-name="T1"> </text:span><text:span text:style-name="T2">(4/13) </text:span> ⲱⲛ̅ϩ̅ ⲉⲃⲟⲗ ϩⲣⲁⲓ̈ ⲛ̅ϩⲏⲧ̅ϥ̅· ϣⲓⲛⲁ ⲉ‐ <text:line-break/><text:span text:style-name="T1"> </text:span><text:span text:style-name="T2">(4/14) </text:span> ⲣⲉⲡⲕⲁⲕⲉ ⲛⲁⲣ̅ⲕⲁⲕⲉ ⲉⲣⲟϥ ⲟⲩⲁⲁϥ <text:line-break/><text:span text:style-name="T1"> </text:span><text:span text:style-name="T2">(4/15) </text:span> ⲕⲁⲧⲁ ⲡⲟⲩⲱϣ ⲙ̅ⲡⲙⲉⲅⲉⲑⲟⲥ· <text:line-break/><text:span text:style-name="T1"> </text:span><text:span text:style-name="T2">(4/16) </text:span> ϫⲉⲕⲁⲁⲥ ⲉⲣⲉⲡⲕⲁⲕⲉ ⲛⲁⲣ̅ ⲁⲣⲅⲟⲛ <text:line-break/><text:span text:style-name="T1"> </text:span><text:span text:style-name="T2">(4/17) </text:span> ⲉⲃⲟⲗ ϩ̅ⲛ̅ ⲉⲓⲇⲟⲥ ⲛⲓⲙ ⲛ̅ⲧⲉ ⲧⲇⲩ‐ <text:line-break/><text:span text:style-name="T1"> </text:span><text:span text:style-name="T2">(4/18) </text:span> ⲛⲁⲙⲓⲥ ⲧⲁⲓ̈ ⲛⲉⲩⲛ̅ⲧⲁϥ̅ⲥ̅· ⲁϥⲥⲱⲕ <text:line-break/><text:span text:style-name="T1"> </text:span><text:span text:style-name="T2">(4/19) </text:span> ⲙ̅ⲡⲕⲱϩ̅ⲧ̅’̅ ⲉⲧ’ϣⲧ̅ⲣ̅ⲧⲱⲣ ⲡⲁⲓ̈ ⲛⲉϥ‐ <text:line-break/><text:span text:style-name="T1"> </text:span><text:span text:style-name="T2">(4/20) </text:span> ϭⲟⲗⲉ ⲙ̅ⲙⲟ〈ϥ〉 ⲛ̅ϭⲓ ⲡⲛⲟⲩⲥ ϩ̅ⲛ̅ <text:line-break/><text:span text:style-name="T1"> </text:span><text:span text:style-name="T2">(4/21) </text:span> ⲧⲙⲏⲧⲉ ⲙ̅ⲡⲕⲁⲕⲉ ⲙ̅ⲛ̅ ⲡⲙⲟⲟⲩ· <text:line-break/><text:span text:style-name="T1"> </text:span><text:span text:style-name="T2">(4/22) </text:span> ⲁⲩⲱ ⲉⲃⲟⲗ ϩ̅ⲙ̅ ⲡⲕⲁⲕⲉ ⲁⲡⲙⲟⲟⲩ <text:line-break/><text:span text:style-name="T1"> </text:span><text:span text:style-name="T2">(4/23) </text:span> ϣⲱⲡⲉ ⲛ̅ⲟⲩⲕⲗⲟⲟⲗⲉ· ⲁⲩⲱ ⲉ‐ <text:line-break/><text:span text:style-name="T1"> </text:span><text:span text:style-name="T2">(4/24) </text:span> ⲃⲟⲗ ϩ̅ⲛ̅ ⲧⲉⲕⲗⲟⲟⲗⲉ ⲁⲧⲁⲧⲉ ϫⲓ ⲉⲓ‐ <text:line-break/><text:span text:style-name="T1"> </text:span><text:span text:style-name="T2">(4/25) </text:span> ⲛⲉ· ⲁⲡⲕⲱϩ̅ⲧ̅’̅ ⲉⲧ’ϣⲧ̅ⲣ̅ⲧⲱⲣ <text:line-break/><text:span text:style-name="T1"> </text:span><text:span text:style-name="T2">(4/26) </text:span> ⲃⲱⲕ ⲉⲙⲁⲩ· ⲡⲁⲓ̈ ⲛⲉϥϣⲟⲟⲡ <text:line-break/><text:span text:style-name="T1"> </text:span><text:span text:style-name="T2">(4/27) </text:span> ⲙ̅ⲡⲗⲁⲛⲏ· ⲛ̅ⲧⲁⲣⲉⲡⲕⲁⲕⲉ ⲇⲉ <text:line-break/><text:span text:style-name="T1"> </text:span><text:span text:style-name="T2">(4/28) </text:span> ⲛⲁⲩ ⲉⲣⲟⲥ ⲁϥϣⲱⲡⲉ ϩ̅ⲛ̅ ⲟⲩⲁ‐ <text:line-break/><text:span text:style-name="T1"> </text:span><text:span text:style-name="T2">(4/29) </text:span> ⲕⲁⲑⲁⲣⲥⲓⲁ· ⲛ̅ⲧⲁⲣⲉϥⲣ̅ⲧⲁⲣⲁⲥ <text:line-break/><text:span text:style-name="T1"> </text:span><text:span text:style-name="T2">(4/30) </text:span> ⲥⲉ ⲇⲉ ⲙ̅ⲡⲙⲟⲟⲩ ⲁϥϩ̅ⲓ̅ ⲛ̅ⲧⲙⲏ‐ <text:line-break/><text:span text:style-name="T1"> </text:span><text:span text:style-name="T2">(4/31) </text:span> ⲧⲣⲁ ⲁϥⲃⲱⲗ ⲉⲃⲟⲗ ⲛ̅ϭⲓ ⲡⲉϥⲛⲟⲩⲥ <text:line-break/><text:span text:style-name="T1"> </text:span><text:span text:style-name="T2">(4/32) </text:span> ⲉⲡⲓⲧ̅ⲛ̅ ⲉⲛⲃⲁⲑⲟⲥ ⲛ̅ⲧⲫⲩⲥⲓⲥ <text:line-break/><text:span text:style-name="T1"> </text:span><text:span text:style-name="T2">(4/33) </text:span> ⲁϥⲧⲱϩ ⲉⲃⲟⲗ ⲛ̅ⲧⲇⲩⲛⲁⲙⲓⲥ ⲙ̅‐ <text:line-break/><text:soft-page-break/><text:span text:style-name="T1"> </text:span><text:span text:style-name="T2">(4/34) </text:span> ⲡⲥⲓϣⲉ ⲙ̅ⲡⲕⲁⲕⲉ· ⲁⲩⲱ ⲁϥⲡⲱϩ <text:line-break/><text:span text:style-name="T1"> </text:span><text:span text:style-name="T2">(4/35) </text:span> ⲛ̅ϭⲓ ⲡⲉⲥⲃⲁⲗ ϩ̅ⲛ̅ ⲧⲡⲟⲛⲏⲣⲓⲁ· <text:line-break/><text:span text:style-name="T1"> </text:span><text:span text:style-name="T2">(4/36) </text:span> ϫⲉⲕⲁⲁⲥ ⲛ̅ⲛⲉⲥⲥⲱⲧⲉ ⲉϫⲡⲟ <text:line-break/><text:span text:style-name="T1"> </text:span><text:span text:style-name="T2">(4/37) </text:span> ⲙ̅ⲡⲛⲟⲩⲥ· ⲛ̅ⲧⲟϥ ⲅⲁⲣ ⲛⲉϥϣⲟ‐ <text:line-break/><text:span text:style-name="T1"> </text:span><text:span text:style-name="T2">(5/1) </text:span> [ⲟ]ⲡ ⲛ̅ⲥⲡⲉⲣⲙⲁ ⲛ̅ⲧⲫⲩⲥⲉⲱⲥ· <text:line-break/><text:span text:style-name="T1"> </text:span><text:span text:style-name="T2">(5/2) </text:span> ⲉⲃⲟⲗ ϩ̅ⲛ̅ ⲧⲛⲟⲩⲛⲉ ⲛ̅ⲕⲁⲕⲉ· <text:line-break/><text:span text:style-name="T1"> </text:span><text:span text:style-name="T2">(5/3) </text:span> ⲁⲩⲱ ⲛ̅ⲧⲁⲣⲉⲧⲫⲩⲥⲓⲥ ϫⲓ ⲉⲣⲟⲥ <text:line-break/><text:span text:style-name="T1"> </text:span><text:span text:style-name="T2">(5/4) </text:span> ⲙ̅ⲡⲛⲟⲩⲥ ϩ̅ⲛ̅ ⲧⲇⲩⲛⲁⲙⲓⲥ ⲛ̅ⲕⲁ‐ <text:line-break/><text:span text:style-name="T1"> </text:span><text:span text:style-name="T2">(5/5) </text:span> ⲕⲉ· ⲁⲉⲓⲛⲉ ⲛⲓⲙ ϫⲓ ⲥⲙⲟⲧ’ ϩⲣⲁⲓ̈ <text:line-break/><text:span text:style-name="T1"> </text:span><text:span text:style-name="T2">(5/6) </text:span> ⲛ̅ϩⲏⲧ̅ⲥ̅· ⲁⲩⲱ ⲛ̅ⲧⲁⲣⲉⲡⲕⲁⲕⲉ <text:line-break/><text:span text:style-name="T1"> </text:span><text:span text:style-name="T2">(5/7) </text:span> ϫⲡⲟ ⲛⲁϥ ⲙ̅ⲡⲓⲛⲉ ⲙ̅ⲡⲛⲟⲩⲥ· <text:line-break/><text:span text:style-name="T1"> </text:span><text:span text:style-name="T2">(5/8) </text:span> ⲁϥⲧ̅ⲛ̅ⲧⲱⲛ̅ϥ̅ ⲁⲡⲡ̅ⲛⲁ̅· ⲁⲧⲫⲩ‐ <text:line-break/><text:span text:style-name="T1"> </text:span><text:span text:style-name="T2">(5/9) </text:span> ⲥⲓⲥ ⲅⲁⲣ ⲧⲱⲛ ϫⲉ ⲉⲥⲛⲁⲧⲁϭⲛⲉϥ <text:line-break/><text:span text:style-name="T1"> </text:span><text:span text:style-name="T2">(5/10) </text:span> ⲙ̅ⲡⲉⲥϭ̅ⲙ̅ ϭⲁⲙ ⲉⲣⲟϥ ϫⲉ ⲛⲉⲙ̅ⲛ̅ <text:line-break/><text:span text:style-name="T1"> </text:span><text:span text:style-name="T2">(5/11) </text:span> ⲧⲉⲥ ⲙⲟⲣⲫⲏ ⲙ̅ⲙⲁⲩ ⲉⲃⲟⲗ ⲙ̅ⲡ̅‐ <text:line-break/><text:span text:style-name="T1"> </text:span><text:span text:style-name="T2">(5/12) </text:span> ⲕⲁⲕⲉ· ⲁⲥϫⲡⲟϥ ⲅⲁⲣ ϩ̅ⲛ̅ ⲧⲕⲗⲟ‐ <text:line-break/><text:span text:style-name="T1"> </text:span><text:span text:style-name="T2">(5/13) </text:span> ⲟⲗⲉ· ⲁⲧ’ⲕⲗⲟⲟⲗⲉ ⲇⲉ ⲣ̅ⲟⲩⲟⲉⲓⲛ <text:line-break/><text:span text:style-name="T1"> </text:span><text:span text:style-name="T2">(5/14) </text:span> ⲁⲩⲛⲟⲩⲥ ⲟⲩⲱⲛ̅ϩ̅ ⲉⲃⲟⲗ ⲛ̅ϩⲏ <text:line-break/><text:span text:style-name="T1"> </text:span><text:span text:style-name="T2">(5/15) </text:span> ⲧ̅ⲥ̅· ⲛ̅ⲑⲉ ⲛ̅ⲟⲩⲕⲱϩ̅ⲧ’̅ ⲛ̅ϩ̅ⲣ̅ⲧⲉ <text:line-break/><text:span text:style-name="T1"> </text:span><text:span text:style-name="T2">(5/16) </text:span> ⲉϥⲣ̅ⲃⲗⲁⲡⲧⲉⲓ· ⲁϥⲣ̅ⲉⲛⲧⲓⲛⲁⲥⲥⲉ <text:line-break/><text:span text:style-name="T1"> </text:span><text:span text:style-name="T2">(5/17) </text:span> ⲉϩⲟⲩⲛ ⲉϩ̅ⲣ̅ⲙ̅ ⲡ̅ⲛⲁ̅ ⲛ̅ⲁⲅⲉⲛⲛⲏ‐ <text:line-break/><text:span text:style-name="T1"> </text:span><text:span text:style-name="T2">(5/18) </text:span> ⲧⲟⲛ· ⲉⲡⲉⲓ ⲛⲉⲩⲛ̅ⲧⲁϥ ⲙ̅ⲙⲁⲩ <text:line-break/><text:span text:style-name="T1"> </text:span><text:span text:style-name="T2">(5/19) </text:span> ⲛ̅ⲟⲩⲉⲓⲛⲉ ⲉⲃⲟⲗ ⲛ̅ϩⲏⲧ̅ϥ̅· ϫⲉⲕⲁ‐ <text:line-break/><text:span text:style-name="T1"> </text:span><text:span text:style-name="T2">(5/20) </text:span> ⲁⲥ ⲉⲥⲛⲁϣⲱⲡⲉ ⲉⲥϣⲟⲩⲉⲓⲧ <text:line-break/><text:span text:style-name="T1"> </text:span><text:span text:style-name="T2">(5/21) </text:span> ⲛ̅ϭⲓ ⲧⲫⲩⲥⲓⲥ ⲁⲡⲕⲱϩ̅ⲧ̅’̅ ⲉⲧ’ϣⲧ̅ⲣ̅ <text:line-break/><text:span text:style-name="T1"> </text:span><text:span text:style-name="T2">(5/22) </text:span> ⲧⲱⲣ· ⲁⲩⲱ ⲛ̅ⲧⲉⲩⲛⲟⲩ ⲁⲧⲫⲩ‐ <text:line-break/><text:span text:style-name="T1"> </text:span><text:span text:style-name="T2">(5/23) </text:span> ⲥⲓⲥ ⲡⲱⲣ̅ϫ̅ ⲉϥⲧⲟⲟⲩ ⲙ̅ⲙⲉⲣⲟⲥ· <text:line-break/><text:span text:style-name="T1"> </text:span><text:span text:style-name="T2">(5/24) </text:span> ⲁⲩϣⲱⲡⲉ ⲛ̅ⲕⲗⲟⲟⲗⲉ ⲉⲩϣ̅ⲃ̅ⲃⲓ‐ <text:line-break/><text:span text:style-name="T1"> </text:span><text:span text:style-name="T2">(5/25) </text:span> ⲟⲉⲓⲧ’ ϩ̅ⲙ̅ ⲡⲟⲩⲉⲓⲛⲉ· ⲁⲩⲙⲟⲩ‐ <text:line-break/><text:span text:style-name="T1"> </text:span><text:span text:style-name="T2">(5/26) </text:span> ⲧⲉ ⲉⲣⲟⲟⲩ ϫⲉ ϩⲩⲙⲏⲛ· ⲭⲟⲣⲓⲟⲛ· <text:line-break/><text:span text:style-name="T1"> </text:span><text:span text:style-name="T2">(5/27) </text:span> ⲇⲩⲛⲁⲙⲓⲥ· ⲡⲙⲟⲟⲩ· ⲛⲉϥϣⲟ‐ <text:line-break/><text:span text:style-name="T1"> </text:span><text:span text:style-name="T2">(5/28) </text:span> ⲟⲡ ⲇⲉ ⲛ̅ϭⲓ ⲫⲩⲙⲏⲛ· ⲙ̅ⲛ̅ ⲡⲭⲟ‐ <text:line-break/><text:span text:style-name="T1"> </text:span><text:span text:style-name="T2">(5/29) </text:span> ⲣⲓⲟⲛ· ⲙ̅ⲛ̅ ⲧⲇⲩⲛⲁⲙⲓⲥ ⲛ̅ⲕⲱ‐ <text:line-break/><text:span text:style-name="T1"> </text:span><text:span text:style-name="T2">(5/30) </text:span> ϩ̅ⲧ̅’̅ ⲉⲩϣⲧ̅ⲣ̅ⲧⲱⲣ· ⲁⲩⲱ ⲉⲩ‐ <text:line-break/><text:span text:style-name="T1"> </text:span><text:span text:style-name="T2">(5/31) </text:span> ⲥⲱⲕ ⲙ̅ⲙⲟϥ ⲉⲃⲟⲗ ϩ̅ⲛ̅ ⲧⲙⲏⲧⲉ <text:line-break/><text:span text:style-name="T1"> </text:span><text:span text:style-name="T2">(5/32) </text:span> ⲙ̅ⲡⲕⲁⲕⲉ ⲙ̅ⲛ̅ ⲡⲙⲟⲟⲩ· ϫⲉ ⲛⲉ‐ <text:line-break/><text:span text:style-name="T1"> </text:span><text:span text:style-name="T2">(5/33) </text:span> ⲣⲉⲡⲛⲟⲩⲥ ϩ̅ⲛ̅ ⲧⲙⲏⲧⲉ ⲛ̅ⲧⲫⲩ‐ <text:line-break/><text:span text:style-name="T1"> </text:span><text:span text:style-name="T2">(5/34) </text:span> ⲥⲓⲥ ⲙ̅ⲛ̅ ⲧⲇⲩⲛⲁⲙⲓⲥ ⲛ̅ⲕⲁⲕⲉ· <text:line-break/><text:span text:style-name="T1"> </text:span><text:span text:style-name="T2">(5/35) </text:span> ϣⲓⲛⲁ ϫⲉ ⲛⲟⲩⲕⲟⲗⲗⲁ ⲉⲣⲟϥ ⲛ̅‐ <text:line-break/><text:span text:style-name="T1"> </text:span><text:span text:style-name="T2">(5/36) </text:span> ϭⲓ ⲛ̅ⲙⲟⲟⲩ ⲉⲧⲣ̅ⲃⲗⲁⲡⲧⲉⲓ· <text:line-break/><text:span text:style-name="T1"> </text:span><text:span text:style-name="T2">(6/1) </text:span> ⲉⲧⲃⲉ ⲡⲁⲓ̈ ⲁⲩⲡⲱⲣ̅ϫ̅ ⲛ̅ⲧⲫⲩⲥ̣[ⲓⲥ] <text:line-break/><text:span text:style-name="T1"> </text:span><text:span text:style-name="T2">(6/2) </text:span> ⲕⲁⲧⲁ ⲡⲁⲟⲩⲱϣ· ϫⲉⲕⲁⲁⲥ ⲉ‐ <text:line-break/><text:span text:style-name="T1"> </text:span><text:span text:style-name="T2">(6/3) </text:span> ⲣⲉⲡⲛⲟⲩⲥ ⲛⲁⲛⲟⲟⲩϩ̅ϥ̅ ⲉϩⲣⲁⲓ̈ <text:line-break/><text:span text:style-name="T1"> </text:span><text:span text:style-name="T2">(6/4) </text:span> ⲉⲧⲉϥⲇⲩⲛⲁⲙⲓⲥ· ⲧⲁⲓ̈ ⲛ̅ⲧⲁⲥϫⲓ‐ <text:line-break/><text:span text:style-name="T1"> </text:span><text:span text:style-name="T2">(6/5) </text:span> ⲧ̅ⲥ̅ ⲛ̅ⲧⲟⲟⲧ̅ϥ̅ ⲛ̅ϭⲓ ⲧⲛⲟⲩⲛⲉ ⲛ̅ⲕⲁ‐ <text:line-break/><text:span text:style-name="T1"> </text:span><text:span text:style-name="T2">(6/6) </text:span> ⲕⲉ· ⲧⲁⲓ̈ ⲉⲣⲧⲱϩ ⲛ̅ⲙ̅ⲙⲁϥ· ⲁⲩⲱ <text:line-break/><text:span text:style-name="T1"> </text:span><text:span text:style-name="T2">(6/7) </text:span> ⲁⲥⲟⲩⲱⲛ̅ϩ̅ ⲉⲃⲟⲗ ϩⲣⲁⲓ̈ ϩ̅ⲛ̅ ⲧⲙⲏ‐ <text:line-break/><text:soft-page-break/><text:span text:style-name="T1"> </text:span><text:span text:style-name="T2">(6/8) </text:span> ⲧⲣⲁ· ⲁⲩⲱ ϩ̅ⲙ̅ ⲡⲙⲉⲣⲓⲥⲙⲟⲥ ⲛ̅ⲧ’̅‐ <text:line-break/><text:span text:style-name="T1"> </text:span><text:span text:style-name="T2">(6/9) </text:span> ⲫⲩⲥⲓⲥ ⲁⲥⲡⲱⲣ̅ϫ̅ ⲉⲧ’ⲇⲩⲛⲁⲙⲓⲥ <text:line-break/><text:span text:style-name="T1"> </text:span><text:span text:style-name="T2">(6/10) </text:span> ⲛ̅ⲕⲁⲕⲉ· ⲉⲩⲛ̅ⲧⲁⲥ ⲙ̅ⲙⲁⲩ ⲉⲃⲟⲗ <text:line-break/><text:span text:style-name="T1"> </text:span><text:span text:style-name="T2">(6/11) </text:span> ϩ̅ⲙ̅ ⲡⲛⲟⲩⲥ· ⲁϥⲙⲟⲟϣⲉ ϩ̅ⲛ̅ ⲧⲙⲏ‐ <text:line-break/><text:span text:style-name="T1"> </text:span><text:span text:style-name="T2">(6/12) </text:span> ⲧⲉ ⲛ̅ⲧⲇⲩⲛⲁⲙⲓⲥ ⲡⲁⲓ̈ ⲛⲉϥϣⲟⲟⲡ <text:line-break/><text:span text:style-name="T1"> </text:span><text:span text:style-name="T2">(6/13) </text:span> ⲙ̅ⲙⲉⲥⲟⲧⲏⲥ ⲛ̅ⲧⲫⲩⲥⲓⲥ· ⲡ̅ⲡ̅ⲛ̅ⲁ̅ <text:line-break/><text:span text:style-name="T1"> </text:span><text:span text:style-name="T2">(6/14) </text:span> ⲇⲉ ⲛ̅ⲟⲩⲟⲉⲓⲛ ⲛ̅ⲧⲁⲣⲉⲡⲛⲟⲩⲥ ⲣ̅‐ <text:line-break/><text:span text:style-name="T1"> </text:span><text:span text:style-name="T2">(6/15) </text:span> ⲃⲁⲣⲉⲓ ⲙ̅ⲙⲟϥ ⲁϥⲣ̅ ⲑⲁⲩⲙⲁ· ⲧⲇⲩ‐ <text:line-break/><text:span text:style-name="T1"> </text:span><text:span text:style-name="T2">(6/16) </text:span> ⲛⲁⲙⲓⲥ ⲇⲉ ⲙ̅ⲡⲉϥⲑⲁⲩⲙⲁ· ⲁⲥ‐ <text:line-break/><text:span text:style-name="T1"> </text:span><text:span text:style-name="T2">(6/17) </text:span> ⲛⲟⲩⲟⲩϩ ⲙ̅ⲡⲃⲁⲣⲟⲥ· ⲁⲩⲱ ⲁϥ‐ <text:line-break/><text:span text:style-name="T1"> </text:span><text:span text:style-name="T2">(6/18) </text:span> ⲛⲟⲟⲩϩ̅ϥ̅ ⲉϩⲣⲁⲓ̈ ⲉⲧⲉϥϩ̅ⲙ̅ⲙⲉ· ⲁϥ‐ <text:line-break/><text:span text:style-name="T1"> </text:span><text:span text:style-name="T2">(6/19) </text:span> ϯ ϩ̅ⲓ̅ⲱⲱϥ ⲙ̅ⲡⲟⲩⲟⲉⲓⲛ ⲙ̅ⲡ̅ⲡ̅ⲛⲁ̅· <text:line-break/><text:span text:style-name="T1"> </text:span><text:span text:style-name="T2">(6/20) </text:span> ⲁⲩⲱ ⲛ̅ⲧⲁⲣⲉⲥⲕⲓⲙ ⲛ̅ϭⲓ ⲧⲫⲩⲥⲓⲥ <text:line-break/><text:span text:style-name="T1"> </text:span><text:span text:style-name="T2">(6/21) </text:span> ⲉⲃⲟⲗ ϩ̅ⲛ̅ ⲧⲇⲩⲛⲁⲙⲓⲥ ⲙ̅ⲡⲟⲩⲟⲉⲓⲛ <text:line-break/><text:span text:style-name="T1"> </text:span><text:span text:style-name="T2">(6/22) </text:span> ⲙ̅ⲡ̅ⲡ̅ⲛⲁ̅· ⲁϥⲛⲟⲟⲩϩ̅ϥ̅ ⲛ̅ϭⲓ ⲡⲃⲁⲣⲟⲥ· <text:line-break/><text:span text:style-name="T1"> </text:span><text:span text:style-name="T2">(6/23) </text:span> ⲡⲑⲁⲩⲙⲁ ⲇⲉ ⲙ̅ⲡ{ⲑⲁⲩⲙⲁ}ⲟⲩⲟⲉⲓⲛ <text:line-break/><text:span text:style-name="T1"> </text:span><text:span text:style-name="T2">(6/24) </text:span> ⲁϥⲛⲟⲩⲟⲩϩ ⲙ̅ⲡⲃⲁⲣⲟⲥ· ⲁϥⲣ̅ⲕⲟⲗ <text:line-break/><text:span text:style-name="T1"> </text:span><text:span text:style-name="T2">(6/25) </text:span> ⲗⲁ ⲉⲧⲕⲗⲟⲟⲗⲉ ⲙ̅ⲫⲩⲙⲏⲛ· ⲁⲩⲱ <text:line-break/><text:span text:style-name="T1"> </text:span><text:span text:style-name="T2">(6/26) </text:span> ⲁⲛⲕⲗⲟⲟⲗⲉ ⲧⲏⲣⲟⲩ ⲙ̅ⲡⲕⲁⲕⲉ <text:line-break/><text:span text:style-name="T1"> </text:span><text:span text:style-name="T2">(6/27) </text:span> ⲱϣ ⲉⲃⲟⲗ ⲛⲁⲓ̈ ⲉⲣⲡⲱⲣ̅ϫ̅ ⲉⲁⲙ̅ⲛ̅‐ <text:line-break/><text:span text:style-name="T1"> </text:span><text:span text:style-name="T2">(6/28) </text:span> ⲧⲉ· ⲉⲧⲃⲉ ⲧⲇⲩⲛⲁⲙⲓⲥ ⲛ̅ⲁⲗⲗⲟ‐ <text:line-break/><text:span text:style-name="T1"> </text:span><text:span text:style-name="T2">(6/29) </text:span> ⲧⲣⲓⲟⲛ· ⲡ̅ⲡ̅ⲛ̅ⲁ̅ 〈ⲛ̅〉ⲟⲩⲟⲉⲓⲛ ⲡⲉ ⲉⲣⲉⲓ <text:line-break/><text:span text:style-name="T1"> </text:span><text:span text:style-name="T2">(6/30) </text:span> ⲛ̅ϩⲏⲧⲟⲩ· ⲁⲩⲱ ϩ̅ⲙ̅ ⲡⲟⲩⲱϣ ⲙ̅‐ <text:line-break/><text:span text:style-name="T1"> </text:span><text:span text:style-name="T2">(6/31) </text:span> ⲡⲙⲉⲅⲉⲑⲟⲥ ⲁⲡⲡ̅ⲛ̅ⲁ̅ ⲉⲓⲱⲣ̅ⲙ̅ ⲉ‐ <text:line-break/><text:span text:style-name="T1"> </text:span><text:span text:style-name="T2">(6/32) </text:span> ϩⲣⲁⲓ̈ ⲉⲡⲟⲩⲟⲉⲓⲛ ⲉⲧⲉ ⲙ̅ⲙ̅ⲛ̅ⲧⲉϥ <text:line-break/><text:span text:style-name="T1"> </text:span><text:span text:style-name="T2">(6/33) </text:span> ⲁⲣⲏϫ̅ϥ̅· ϫⲉⲕⲁⲁⲥ ⲉⲩⲛⲁⲛⲁ ⲙ̅‐ <text:line-break/><text:span text:style-name="T1"> </text:span><text:span text:style-name="T2">(6/34) </text:span> ⲡⲉϥⲟⲩⲟⲉⲓⲛ· ⲁⲩⲱ ⲁⲩⲉⲓⲛⲉ ⲙ̅‐ <text:line-break/><text:span text:style-name="T1"> </text:span><text:span text:style-name="T2">(6/35) </text:span> ⲡⲓⲛⲉ ⲉϩⲣⲁⲓ̈ ϩ̅ⲛ̅ ⲉⲙ̅ⲛ̅ⲧⲉ· ⲁⲩⲱ <text:line-break/><text:span text:style-name="T1"> </text:span><text:span text:style-name="T2">(6/36) </text:span> ⲛ̅ⲧⲁⲣⲉⲡ̅ⲛ̅ⲁ̅ ϭⲱϣ̅ⲧ’̅ ⲁⲓ̈ϩⲉϯⲉ <text:line-break/><text:span text:style-name="T1"> </text:span><text:span text:style-name="T2">(7/1) </text:span> ⲉⲃⲟⲗ ⲁⲛⲟⲕ ⲡϣⲏⲣⲉ ⲙ̅ⲡⲙⲉ‐ <text:line-break/><text:span text:style-name="T1"> </text:span><text:span text:style-name="T2">(7/2) </text:span> ⲅⲉⲑⲟⲥ ⲛ̅ⲑⲉ ⲛ̅ⲛⲓϩⲁⲙ ⲛ̅ⲟⲩⲟⲉⲓⲛ· <text:line-break/><text:span text:style-name="T1"> </text:span><text:span text:style-name="T2">(7/3) </text:span> ⲁⲩⲱ ⲛ̅ⲑⲉ ⲛ̅ⲟⲩϩⲁⲧⲏⲩ ⲙ̅ⲡ̅ⲛ̅ⲁ̅ <text:line-break/><text:span text:style-name="T1"> </text:span><text:span text:style-name="T2">(7/4) </text:span> ⲛ̅ⲁⲑⲁ〈ⲛⲁ〉ⲧⲟⲛ· ⲁⲩⲱ ⲁⲉⲓⲛⲓϥⲉ ϩ̅ⲛ̅ <text:line-break/><text:span text:style-name="T1"> </text:span><text:span text:style-name="T2">(7/5) </text:span> ⲧⲕⲗⲟⲟⲗⲉ ⲙ̅ⲫⲩⲙⲏⲛ ⲉϫ̅ⲙ̅ ⲡⲑⲁⲩ‐ <text:line-break/><text:span text:style-name="T1"> </text:span><text:span text:style-name="T2">(7/6) </text:span> ⲙⲁ ⲙ̅ⲡ̅ⲛ̅ⲁ̅ ⲛ̅ⲁⲅⲉⲛⲛⲏⲧⲟⲛ· ⲁⲥ‐ <text:line-break/><text:span text:style-name="T1"> </text:span><text:span text:style-name="T2">(7/7) </text:span> ⲡⲱⲣ̅ϫ̅ ⲁⲥⲣ̅ⲟⲩⲟⲉⲓⲛ ⲉⲛⲕⲗⲟⲟⲗⲉ· <text:line-break/><text:span text:style-name="T1"> </text:span><text:span text:style-name="T2">(7/8) </text:span> ⲁⲛⲁⲓ̈ ⲡⲱⲣ̅ϫ̅ ϫⲉⲕⲁⲁⲥ ⲉϥⲛⲁⲛⲟ‐ <text:line-break/><text:span text:style-name="T1"> </text:span><text:span text:style-name="T2">(7/9) </text:span> ⲟⲩϩ̅ϥ̅ ⲛ̅ϭⲓ ⲡ̅ⲛⲁ̅· ⲉⲧⲃⲉ ⲡⲁⲓ̈ ⲁⲡⲛⲟⲩⲥ <text:line-break/><text:span text:style-name="T1"> </text:span><text:span text:style-name="T2">(7/10) </text:span> ϫⲓ ⲉⲓⲛⲉ· ⲁⲩⲁϫ̅ⲛ̅ ⲧⲉϥⲁⲛⲁⲡⲁⲩ <text:line-break/><text:span text:style-name="T1"> </text:span><text:span text:style-name="T2">(7/11) </text:span> ⲥⲓⲥ· ⲫⲩⲙⲏⲛ ⲅⲁⲣ ⲛ̅ⲧⲫⲩⲥⲓⲥ <text:line-break/><text:span text:style-name="T1"> </text:span><text:span text:style-name="T2">(7/12) </text:span> ⲛⲉϥϣⲟⲟⲡ ⲛ̅ⲕⲗⲟⲟⲗⲉ ⲉⲙⲁⲩϣⲁ <text:line-break/><text:span text:style-name="T1"> </text:span><text:span text:style-name="T2">(7/13) </text:span> ⲙⲁϩⲧⲉ ⲙ̅ⲙⲟⲥ· ⲟⲩⲕⲱϩ̅ⲧ̅’̅ ⲉⲛⲁ‐ <text:line-break/><text:span text:style-name="T1"> </text:span><text:span text:style-name="T2">(7/14) </text:span> ϣⲱϥ ⲡⲉ· ϩⲟⲙⲟⲓⲱⲥ ⲡⲭⲟⲣⲓⲟⲛ <text:line-break/><text:span text:style-name="T1"> </text:span><text:span text:style-name="T2">(7/15) </text:span> ⲛ̅ⲧⲫⲩⲥⲓⲥ· ⲧⲕⲗⲟⲟⲗⲉ ⲙ̅ⲡⲕⲁ‐ <text:line-break/><text:span text:style-name="T1"> </text:span><text:span text:style-name="T2">(7/16) </text:span> ⲣⲱϥ ⲡⲉ· ⲟⲩⲕⲱϩ̅ⲧ̅’̅ ⲛ̅ⲥⲉⲙⲛⲟⲛ <text:line-break/><text:span text:style-name="T1"> </text:span><text:span text:style-name="T2">(7/17) </text:span> ⲡⲉ· ⲁⲩⲱ ⲧⲇⲩⲛⲁⲙⲓⲥ ⲉⲧ’ⲧⲏϩ <text:line-break/><text:span text:style-name="T1"> </text:span><text:span text:style-name="T2">(7/18) </text:span> ⲙ̅ⲛ̅ ⲡⲛⲟⲩⲥ· ⲁⲩⲱ ⲛⲉⲧⲁⲓ̈ ϣⲟ‐ <text:line-break/><text:soft-page-break/><text:span text:style-name="T1"> </text:span><text:span text:style-name="T2">(7/19) </text:span> ⲟⲡ ⲛ̅ⲕⲗⲟⲟⲗⲉ ⲛ̅ⲧⲫⲩⲥⲓⲥ· ⲧⲁⲓ̈ <text:line-break/><text:span text:style-name="T1"> </text:span><text:span text:style-name="T2">(7/20) </text:span> ⲛ̅ⲧⲁⲩⲧⲁⲧ̅ⲥ̅ ⲙ̅ⲛ̅ ⲡⲕⲁⲕⲉ· ⲡⲁⲓ̈ <text:line-break/><text:span text:style-name="T1"> </text:span><text:span text:style-name="T2">(7/21) </text:span> ⲉⲣϣⲧⲟⲣⲧ̅ⲣ̅ ⲛ̅ⲧⲫⲩⲥⲓⲥ ⲉϩⲣⲁⲓ̈ <text:line-break/><text:span text:style-name="T1"> </text:span><text:span text:style-name="T2">(7/22) </text:span> ⲉⲩⲁⲕⲁⲑⲁⲣⲥⲓⲁ· ⲡⲙⲟⲟⲩ ⲇⲉ ⲛ̅‐ <text:line-break/><text:span text:style-name="T1"> </text:span><text:span text:style-name="T2">(7/23) </text:span> ⲕⲁⲕⲉ ⲛⲉϥϣⲟⲟⲡ ⲛ̅ⲟⲩⲕⲗⲟⲟ‐ <text:line-break/><text:span text:style-name="T1"> </text:span><text:span text:style-name="T2">(7/24) </text:span> ⲗⲉ ⲛ̅ϩ̅ⲣ̅ⲧⲉ· ⲁⲩⲱ ⲛⲉⲧⲛⲟⲩⲛⲉ <text:line-break/><text:span text:style-name="T1"> </text:span><text:span text:style-name="T2">(7/25) </text:span> ⲛ̅ⲧⲫⲩⲥⲓⲥ ⲉⲧ̅ⲙ̅ⲡⲥⲁ ⲙ̅ⲡⲓⲧ̅ⲛ̅ <text:line-break/><text:span text:style-name="T1"> </text:span><text:span text:style-name="T2">(7/26) </text:span> ϭⲟⲟⲩϭ· ⲉⲥⲣ̅ⲃⲁⲣⲉⲓⲥⲑⲁⲓ ⲁⲩⲱ <text:line-break/><text:span text:style-name="T1"> </text:span><text:span text:style-name="T2">(7/27) </text:span> ⲉⲥⲣ̅ⲃⲗⲁⲡⲧⲉⲓ· ⲧⲛⲟⲩⲛⲉ ⲛⲉⲥ‐ <text:line-break/><text:span text:style-name="T1"> </text:span><text:span text:style-name="T2">(7/28) </text:span> ⲟ̅ ⲛ̅ⲃ̅ⲗ̅ⲗⲏ ⲛ̅ⲧ̅ⲙ̅ ⲡⲟⲩⲟⲉⲓⲛ ⲙ̅ⲙ̅ⲣ̅‐ <text:line-break/><text:span text:style-name="T1"> </text:span><text:span text:style-name="T2">(7/29) </text:span> ⲣⲉ ⲉⲙⲡⲟⲩϣϭ̅ⲛ̅ ⲣⲁⲧ̅ϥ̅· ⲉⲛ‐ <text:line-break/><text:span text:style-name="T1"> </text:span><text:span text:style-name="T2">(7/30) </text:span> ⲧⲁⲩⲕⲁⲁϥ ϩ̅ⲛ̅ ϩⲁϩ ⲙ̅ⲡⲣⲟⲥⲱⲡⲟⲛ <text:line-break/><text:span text:style-name="T1"> </text:span><text:span text:style-name="T2">(7/31) </text:span> ⲁⲛⲟⲕ ⲇⲉ ⲁⲉⲓϣ̅ⲛ̅ ϩⲧⲏⲉⲓ ⲉϫ̅ⲙ̅ <text:line-break/><text:span text:style-name="T1"> </text:span><text:span text:style-name="T2">(7/32) </text:span> ⲡⲟⲩⲟⲉⲓⲛ [2̅ⲙ̅]̅2̅ⲡ̅ⲡ̅ⲛⲁ̅· ⲡⲁⲓ̈ ⲛ̅ⲧⲁϥϫⲓ‐ <text:line-break/><text:span text:style-name="T1"> </text:span><text:span text:style-name="T2">(7/33) </text:span> ⲧ̅ϥ̅ ⲛ̅ϭⲓ ⲡⲛⲟⲩⲥ· ⲁⲉⲓⲛⲟⲟⲩϩ̅ⲧ’̅ <text:line-break/><text:span text:style-name="T1"> </text:span><text:span text:style-name="T2">(7/34) </text:span> ⲉϩⲣⲁⲓ̈ ⲉⲧⲁⲑⲉⲥⲓⲥ ⲉⲧⲣⲁⲥⲟⲡ <text:line-break/><text:span text:style-name="T1"> </text:span><text:span text:style-name="T2">(7/35) </text:span> ⲥ̅ⲡ̅ ⲙ̅ⲡⲟⲩⲟⲉⲓⲛ ⲉⲧ’ϫⲟ̣ⲥ̣ⲉ [ⲉⲧ]‐ <text:line-break/><text:span text:style-name="T1"> </text:span><text:span text:style-name="T2">(8/1) </text:span> ⲉ ⲙ̅ⲛ̅ⲧⲉϥ ⲁⲣⲏϫ̅ϥ̅· ϫⲉⲕⲁⲁ[ⲥ ⲉ]‐ <text:line-break/><text:span text:style-name="T1"> </text:span><text:span text:style-name="T2">(8/2) </text:span> ⲣⲉⲧⲇⲩⲛⲁⲙⲓⲥ ⲙ̅ⲡ̅ⲡ̅ⲛⲁ̅ ⲛⲁⲁϣ[ⲉ] <text:line-break/><text:span text:style-name="T1"> </text:span><text:span text:style-name="T2">(8/3) </text:span> ϩ̅ⲓ̅ϫ̅ⲙ̅ ⲡⲧⲟⲡⲟⲥ· ⲁⲩⲱ ⲛ̅ⲥ̅ⲙⲟⲩ[ϩ] <text:line-break/><text:span text:style-name="T1"> </text:span><text:span text:style-name="T2">(8/4) </text:span> ⲛ̅ⲟⲩⲱϣ ⲛ̅ϫⲱϩ̅ⲙ̅ ⲛ̅ⲕⲁⲕⲉ· ⲁⲩⲱ <text:line-break/><text:span text:style-name="T1"> </text:span><text:span text:style-name="T2">(8/5) </text:span> ⲉⲃⲟⲗ ϩ̅ⲛ̅ⲛ ⲟⲩⲧ̅ⲃ̅ⲃⲟ· ⲡⲉϫⲁⲓ̈ ϫⲉ <text:line-break/><text:span text:style-name="T1"> </text:span><text:span text:style-name="T2">(8/6) </text:span> ⲛ̅ⲧⲟⲕ ⲡⲉ ⲧⲛⲟⲩⲛⲉ ⲙ̅ⲡⲟⲩⲟⲉⲓⲛ· <text:line-break/><text:span text:style-name="T1"> </text:span><text:span text:style-name="T2">(8/7) </text:span> ⲡⲉⲕⲥⲭⲏⲙⲁ ⲉⲑⲏⲡ ⲁϥⲟⲩⲱⲛ̅ϩ̅ <text:line-break/><text:span text:style-name="T1"> </text:span><text:span text:style-name="T2">(8/8) </text:span> ⲉⲃⲟⲗ· ⲡⲉⲧ’ϫⲟⲥⲉ ⲡⲉⲧⲉⲙ̅ⲛ̅ⲧⲉϥ <text:line-break/><text:span text:style-name="T1"> </text:span><text:span text:style-name="T2">(8/9) </text:span> ⲁⲣⲏϫ̅ϥ̅· ⲧⲇⲩⲛⲁⲙⲓⲥ ⲧⲏⲣ̅ⲥ̅ ⲛ̅ⲧⲉ‐ <text:line-break/><text:span text:style-name="T1"> </text:span><text:span text:style-name="T2">(8/10) </text:span> ⲡ̅ⲛ̅ⲁ̅ ⲙⲁⲣⲉⲥϣⲱϣ· ⲁⲩⲱ ⲛ̅ⲥ̅ⲙⲟⲩϩ <text:line-break/><text:span text:style-name="T1"> </text:span><text:span text:style-name="T2">(8/11) </text:span> ϩ̅ⲙ̅ ⲡⲉⲥⲟⲩⲟⲉⲓⲛ· ⲡⲟⲩⲟⲉⲓⲛ ⲉⲧⲉ‐ <text:line-break/><text:span text:style-name="T1"> </text:span><text:span text:style-name="T2">(8/12) </text:span> ⲙ̅ⲙ̅ⲛ̅ⲧⲉϥ ⲁⲣⲏϫ̅ϥ̅· ϥⲛⲁϣϩⲱⲧ̅ⲣ̅ <text:line-break/><text:span text:style-name="T1"> </text:span><text:span text:style-name="T2">(8/13) </text:span> ⲁⲛ ⲙ̅ⲛ̅ ⲡ̅ⲛⲁ̅ ⲛ̅ⲁⲅⲉⲛⲛⲏⲧⲟⲛ· ⲁⲩⲱ <text:line-break/><text:span text:style-name="T1"> </text:span><text:span text:style-name="T2">(8/14) </text:span> ⲧⲇⲩⲛⲁⲙⲓⲥ ⲙ̅ⲡ̅ⲑⲁⲩⲙⲁ ⲛⲁϣⲧⲱϩ <text:line-break/><text:span text:style-name="T1"> </text:span><text:span text:style-name="T2">(8/15) </text:span> ⲁⲛ ⲙ̅ⲛ̅ ⲧⲫⲩⲥⲓⲥ ⲕⲁⲧⲁ ⲡⲟⲩⲱϣ <text:line-break/><text:span text:style-name="T1"> </text:span><text:span text:style-name="T2">(8/16) </text:span> ⲙ̅ⲡⲙⲉⲅⲉⲑⲟⲥ· ⲁⲩϫⲓ ⲛ̅ⲧⲁⲡⲣⲟⲥ <text:line-break/><text:span text:style-name="T1"> </text:span><text:span text:style-name="T2">(8/17) </text:span> ⲉⲩⲭⲏ ⲛ̅ⲧⲟⲟⲧ’· ⲁⲩⲱ ⲁⲩⲥⲱⲧ̅ⲙ̅ <text:line-break/><text:span text:style-name="T1"> </text:span><text:span text:style-name="T2">(8/18) </text:span> ⲉⲡϩⲣⲟⲟⲩ ⲙ̅ⲡⲗⲟⲅⲟⲥ ⲉϥϫⲱ ⲙ̅‐ <text:line-break/><text:span text:style-name="T1"> </text:span><text:span text:style-name="T2">(8/19) </text:span> ⲙⲟⲥ ⲉⲃⲟⲗ ϩ̅ⲓ̅ⲧ̅ⲙ̅ ⲡⲙⲉⲅⲉⲑⲟⲥ 〈ⲙ̅〉ⲡ̅ <text:line-break/><text:span text:style-name="T1"> </text:span><text:span text:style-name="T2">(8/20) </text:span> ⲡ̅ⲛ̅ⲁ̅ ⲛ̅ⲁⲅⲉⲛⲛⲏⲧⲟⲛ ϫⲉ ⲉⲓⲥ ⲧⲇⲩ‐ <text:line-break/><text:span text:style-name="T1"> </text:span><text:span text:style-name="T2">(8/21) </text:span> ⲛⲁⲙⲓⲥ ⲁⲥϫⲱⲕ ⲉⲃⲟⲗ· ⲡⲉⲣϭⲱⲗ̅ⲡ̅ <text:line-break/><text:span text:style-name="T1"> </text:span><text:span text:style-name="T2">(8/22) </text:span> ⲉⲃⲟⲗ ϩ̅ⲓ̅ⲧⲟⲟⲧ’· ⲁϥⲟⲩⲱ〈ⲛ̅〉̅ϩ ⲉⲃⲟⲗ ϩ̅ⲙ̅ <text:line-break/><text:span text:style-name="T1"> </text:span><text:span text:style-name="T2">(8/23) </text:span> ⲡ̅ⲛ̅ⲁ̅· ⲡⲁⲗⲓⲛ ϯⲛⲁⲟⲩⲱⲛ̅ϩ̅ ⲉⲃⲟⲗ· <text:line-break/><text:span text:style-name="T1"> </text:span><text:span text:style-name="T2">(8/24) </text:span> ⲁⲛⲟⲕ ⲡⲉ ⲇⲉⲣⲇⲉⲕⲉⲁⲥ ⲡϣⲏⲣⲉ <text:line-break/><text:span text:style-name="T1"> </text:span><text:span text:style-name="T2">(8/25) </text:span> ⲙ̅ⲡⲟⲩⲟⲉⲓⲛ ⲛ̅ⲁⲧ’ϫⲱϩ̅ⲙ̅ ⲉⲧⲉ ⲙ̅‐ <text:line-break/><text:span text:style-name="T1"> </text:span><text:span text:style-name="T2">(8/26) </text:span> ⲙ̅ⲛ̅ⲧⲉϥ ⲁⲣⲏϫ̅ϥ̅· ⲡⲟⲩⲟⲉⲓⲛ ⲛ̅ⲧⲉ <text:line-break/><text:span text:style-name="T1"> </text:span><text:span text:style-name="T2">(8/27) </text:span> ⲡ̅ⲛ̅ⲁ̅ ⲉⲧⲉ ⲙ̅ⲙ̅ⲛ̅ⲧⲉϥ ⲁⲣⲏϫ̅ϥ̅· ⲁϥ‐ <text:line-break/><text:span text:style-name="T1"> </text:span><text:span text:style-name="T2">(8/28) </text:span> ⲉ̅ⲓ̅ ⲉⲡⲓⲧ̅ⲛ̅ ⲉⲩⲫⲩⲥⲓⲥ ⲛ̅ϭⲱⲃ ⲡⲣⲟⲥ <text:line-break/><text:span text:style-name="T1"> </text:span><text:span text:style-name="T2">(8/29) </text:span> ⲟⲩⲕⲟⲩⲉⲓ ⲛ̅ⲭⲣⲟⲛⲟⲥ ϣⲁⲛⲧⲉ <text:line-break/><text:span text:style-name="T1"> </text:span><text:span text:style-name="T2">(8/30) </text:span> ⲡⲁⲕⲁⲑⲁⲣⲧⲟⲛ ⲧⲏⲣ̅ϥ̅ ⲛ̅ⲧⲉ ⲧⲫⲩ‐ <text:line-break/><text:soft-page-break/><text:span text:style-name="T1"> </text:span><text:span text:style-name="T2">(8/31) </text:span> ⲥⲓⲥ ϣⲱⲡⲉ ⲉϥϣⲟⲩⲉⲓⲧ’· ϣⲓⲛⲁ‐ <text:line-break/><text:span text:style-name="T1"> </text:span><text:span text:style-name="T2">(8/32) </text:span> ⲇⲉ ⲉⲩⲛⲁϫⲡⲓⲟ ⲙ̅ⲡⲕⲁⲕⲉ ⲛ̅ⲧ̅‐ <text:line-break/><text:span text:style-name="T1"> </text:span><text:span text:style-name="T2">(8/33) </text:span> ⲫⲩⲥⲓⲥ· ⲁⲉⲓϯ ϩ̅ⲓ̅ⲱⲱⲧ’ ⲛ̅ⲧⲁ‐ <text:line-break/><text:span text:style-name="T1"> </text:span><text:span text:style-name="T2">(8/34) </text:span> ϩ̅ⲃ̅ⲥⲱ· ⲉⲧⲉ ⲡⲁⲓ̈ ⲡⲉ ⲑ̅ⲃ̅ⲥⲱ ⲙ̅ⲡⲟⲩ‐ <text:line-break/><text:span text:style-name="T1"> </text:span><text:span text:style-name="T2">(8/35) </text:span> ⲟⲉⲓⲛ ⲙ̅ⲡⲙⲉⲅⲉⲑⲟⲥ ⲉⲧⲉ ⲁⲛⲟⲕ <text:line-break/><text:span text:style-name="T1"> </text:span><text:span text:style-name="T2">(8/36) </text:span> ⲡⲉ ⲁⲉⲓϣⲱⲡⲉ ϩ̅ⲛ̅ ⲑⲟⲣⲁⲥⲓⲥ ⲙ̅ⲡ̅‐ <text:line-break/><text:span text:style-name="T1"> </text:span><text:span text:style-name="T2">(9/1) </text:span> [ⲡ]ⲛ̅ⲁ̅ ⲉⲧⲣⲁⲙⲉⲉⲩⲉ ⲉⲡⲟⲩⲟⲉⲓⲛ <text:line-break/><text:span text:style-name="T1"> </text:span><text:span text:style-name="T2">(9/2) </text:span> ⲧ̣ⲏⲣ̅ϥ̅· ⲡⲁⲓ̈ ⲛⲉϥϣⲟⲟⲡ ϩ̅ⲛ̅ ⲛ̅ⲃⲁ‐ <text:line-break/><text:span text:style-name="T1"> </text:span><text:span text:style-name="T2">(9/3) </text:span> ⲑⲟⲛ ⲙ̅ⲡⲕⲁⲕⲉ· ⲕⲁⲧⲁ ⲡⲟⲩⲱϣ <text:line-break/><text:span text:style-name="T1"> </text:span><text:span text:style-name="T2">(9/4) </text:span> ⲙ̅ⲡⲙⲉⲅⲉⲑⲟⲥ· ϫⲉⲕⲁⲁⲥ ⲉⲣⲉⲡ̅ⲛ̅ⲁ̅· <text:line-break/><text:span text:style-name="T1"> </text:span><text:span text:style-name="T2">(9/5) </text:span> ϩ̅ⲙ̅ ⲡⲗⲟⲅⲟⲥ ⲉϥⲛⲁⲙⲟⲩϩ ϩ̅ⲙ̅ ⲡⲉϥ‐ <text:line-break/><text:span text:style-name="T1"> </text:span><text:span text:style-name="T2">(9/6) </text:span> ⲟⲩⲟⲉⲓⲛ ⲭⲱⲣⲓⲥ ⲧⲇⲩⲛⲁⲙⲓⲥ ⲙ̅‐ <text:line-break/><text:span text:style-name="T1"> </text:span><text:span text:style-name="T2">(9/7) </text:span> ⲡⲟⲩⲟⲉⲓⲛ ⲉⲧⲉ ⲙ̅ⲙ̅ⲛ̅ⲧⲉϥ ⲁⲣⲏ‐ <text:line-break/><text:span text:style-name="T1"> </text:span><text:span text:style-name="T2">(9/8) </text:span> ϫ̅ϥ̅· ϩ̅ⲙ̅ ⲡⲁⲟⲩⲱϣⲉ ⲇⲉ ⲁⲡⲡ̅ⲛⲁ̅ <text:line-break/><text:span text:style-name="T1"> </text:span><text:span text:style-name="T2">(9/9) </text:span> ϫⲓⲥⲉ ϩ̅ⲛ̅ ⲧⲉϥⲇⲩⲛⲁⲙⲓⲥ· ⲁⲩⲣ̅‐ <text:line-break/><text:span text:style-name="T1"> </text:span><text:span text:style-name="T2">(9/10) </text:span> ⲭⲁⲣⲓⲥⲥⲉ ⲛⲁϥ ⲙ̅ⲡⲉϥⲙⲉⲅⲉⲑⲟⲥ <text:line-break/><text:span text:style-name="T1"> </text:span><text:span text:style-name="T2">(9/11) </text:span> ⲉⲧⲣⲉϥⲙⲟⲩϩ ⲙ̅ⲡⲉϥⲟⲩⲟⲉⲓⲛ <text:line-break/><text:span text:style-name="T1"> </text:span><text:span text:style-name="T2">(9/12) </text:span> ⲧⲏⲣ̅ϥ̅ ⲛ̅ϥⲓ ⲉⲃⲟⲗ ϩ̅ⲙ̅ ⲡⲃⲁⲣⲟⲥ ⲧⲏ‐ <text:line-break/><text:span text:style-name="T1"> </text:span><text:span text:style-name="T2">(9/13) </text:span> ⲣ̅ϥ̅ ⲙ̅ⲡⲕⲁⲕⲉ· ⲡⲉⲧ’ϩ̅ⲓ̅ⲡⲁϩⲟⲩ ⲅⲁⲣ <text:line-break/><text:span text:style-name="T1"> </text:span><text:span text:style-name="T2">(9/14) </text:span> ⲛⲉⲩⲕⲱϩ̅ⲧ̅’̅ ⲡⲉ ⲛ̅ⲕⲁⲕⲉ ⲉϥⲛⲓ‐ <text:line-break/><text:span text:style-name="T1"> </text:span><text:span text:style-name="T2">(9/15) </text:span> ϥⲉ ⲉϥⲣ̅ⲃⲁⲣⲉ ϩ̅ⲙ̅ ⲡ̅ⲛⲁ̅· ⲁⲩⲱ ⲁϥ‐ <text:line-break/><text:span text:style-name="T1"> </text:span><text:span text:style-name="T2">(9/16) </text:span> ⲣⲁϣⲉ ⲛ̅ϭⲓ ⲡ̅ⲛ̅ⲁ̅ ϫⲉ ⲁⲩϩⲁⲣⲉϩ ⲉ‐ <text:line-break/><text:span text:style-name="T1"> </text:span><text:span text:style-name="T2">(9/17) </text:span> ⲣⲟϥ ⲉⲡⲙⲟⲟⲩ ⲙ̅ϩ̅ⲣ̅ⲧⲉ· ⲁⲗⲗⲁ <text:line-break/><text:span text:style-name="T1"> </text:span><text:span text:style-name="T2">(9/18) </text:span> ⲡⲉϥⲟⲩⲟⲉⲓⲛ ⲛⲉϥϣⲏϣ ⲁⲛ ⲙ̅ⲛ̅ <text:line-break/><text:span text:style-name="T1"> </text:span><text:span text:style-name="T2">(9/19) </text:span> ⲡⲙⲉⲅⲉⲑⲟⲥ· ⲡⲉⲛⲧⲁⲩⲣ̅ⲭⲁⲣⲓⲍⲉ <text:line-break/><text:span text:style-name="T1"> </text:span><text:span text:style-name="T2">(9/20) </text:span> ⲇⲉ ⲛⲁϥ ϩ̅ⲓ̅ⲧ̅ⲙ̅ ⲡⲟⲩⲟⲉⲓⲛ ⲉⲙ̅ⲛ̅ <text:line-break/><text:span text:style-name="T1"> </text:span><text:span text:style-name="T2">(9/21) </text:span> ⲧⲉϥ ⲁⲣⲏϫ̅ϥ̅· ϣⲓⲛⲁ ϩ̅ⲛ̅ ⲛⲉϥⲙⲉⲗⲟⲥ <text:line-break/><text:span text:style-name="T1"> </text:span><text:span text:style-name="T2">(9/22) </text:span> ⲧⲏⲣⲟⲩ ⲉϥⲛⲁⲟⲩⲱⲛ̅ϩ̅ ⲉⲃⲟⲗ ⲛ̅‐ <text:line-break/><text:span text:style-name="T1"> </text:span><text:span text:style-name="T2">(9/23) </text:span> ⲟⲩⲉⲓⲛⲉ ⲛ̅ⲟⲩⲱⲧ’ ⲛ̅ⲟⲩⲟⲉⲓⲛ· <text:line-break/><text:span text:style-name="T1"> </text:span><text:span text:style-name="T2">(9/24) </text:span> ⲛ̅ⲧⲁⲣⲉⲡ̅ⲛ̅ⲁ̅ ⲇⲉ ϫⲓⲥⲉ ⲉⲡⲙⲟⲟⲩ <text:line-break/><text:span text:style-name="T1"> </text:span><text:span text:style-name="T2">(9/25) </text:span> ⲁϥϭⲱⲗ̅ⲡ̅ ⲉⲃⲟⲗ ⲛ̅ϭⲓ ⲡⲉϥⲉⲓⲛⲉ ⲛ̅‐ <text:line-break/><text:span text:style-name="T1"> </text:span><text:span text:style-name="T2">(9/26) </text:span> ⲕⲁⲙⲉ· ⲁⲩⲱ ⲁⲡⲡ̅ⲛ̅ⲁ̅ ⲣ̅ⲧⲓⲙⲁ <text:line-break/><text:span text:style-name="T1"> </text:span><text:span text:style-name="T2">(9/27) </text:span> ⲙ̅ⲡⲟⲩⲟⲉⲓⲛ ⲉⲧ’ϫⲟⲥⲉ· ⲉⲓ̈ⲉ ⲛ̅‐ <text:line-break/><text:span text:style-name="T1"> </text:span><text:span text:style-name="T2">(9/28) </text:span> ⲧⲟⲕ ⲟⲩⲁⲁⲕ ⲡⲉⲧⲉ ⲙ̅ⲙ̅ⲛ̅ⲧⲁⲕ <text:line-break/><text:span text:style-name="T1"> </text:span><text:span text:style-name="T2">(9/29) </text:span> ⲁⲣⲏϫ̅ϥ̅· ϩⲟⲧⲉ ϫⲉ ⲕ̅ⲛ̅ⲧⲡⲉ ⲛ̅ⲁ‐ <text:line-break/><text:span text:style-name="T1"> </text:span><text:span text:style-name="T2">(9/30) </text:span> ⲅⲉⲛⲛⲏⲧⲟⲛ ⲛⲓⲙ ϫⲉ ⲁⲕⲁⲣⲉϩ <text:line-break/><text:span text:style-name="T1"> </text:span><text:span text:style-name="T2">(9/31) </text:span> ⲉⲣⲟⲓ̈ ⲉⲡⲕⲁⲕⲉ· ⲁⲩⲱ ⲛ̅ⲧⲁⲣⲉⲕ <text:line-break/><text:span text:style-name="T1"> </text:span><text:span text:style-name="T2">(9/32) </text:span> ⲟⲩⲱϣ ⲁⲉⲓϫⲓⲥⲉ ⲁⲧ’ⲇⲩⲛⲁⲙⲓⲥ <text:line-break/><text:span text:style-name="T1"> </text:span><text:span text:style-name="T2">(9/33) </text:span> ⲛ̅ⲕⲁⲕⲉ· ⲁⲩⲱ ϣⲓⲛⲁ ϫⲉ ⲛⲉ <text:line-break/><text:span text:style-name="T1"> </text:span><text:span text:style-name="T2">(9/34) </text:span> ⲗⲁⲁⲩ ϩⲱⲡ ⲉⲣⲟⲕ ⲥⲏ̅ⲉ̅ⲙ̅· ⲡⲙⲉ <text:line-break/><text:span text:style-name="T1"> </text:span><text:span text:style-name="T2">(9/35) </text:span> ⲉⲩⲉ ⲛ̅ⲧⲁϥⲙⲉⲉⲩⲉ ⲉⲣⲟϥ ⲛ̅ϭⲓ ⲡ̅‐ <text:line-break/><text:span text:style-name="T1"> </text:span><text:span text:style-name="T2">(9/36) </text:span> ⲡ̅ⲛ̅ⲁ̅ ⲉⲃⲟⲗ ϩ̅ⲛ̅ ⲧⲙ̅ⲛ̅ⲧⲛⲟϭ ⲁϥϣⲱⲡⲉ <text:line-break/><text:span text:style-name="T1"> </text:span><text:span text:style-name="T2">(10/1) </text:span> ⲉⲡⲓⲇⲏ ⲙ̅ⲡⲉⲡⲕⲁⲕⲉ ϭ̅ⲙ̅ϭⲟⲙ̣ [ⲉ]‐ <text:line-break/><text:span text:style-name="T1"> </text:span><text:span text:style-name="T2">(10/2) </text:span> ⲁⲙⲁϩⲧⲉ ⲛ̅ⲧⲉϥⲕⲁϭⲓⲁ· ⲁⲗⲗⲁ ⲛ̅ⲧ[ⲁ]‐ <text:line-break/><text:span text:style-name="T1"> </text:span><text:span text:style-name="T2">(10/3) </text:span> ⲣⲉϥⲟⲩⲱⲛ̅ϩ̅ ⲉⲃⲟⲗ ⲁⲩⲥⲟⲩⲱⲛ <text:line-break/><text:span text:style-name="T1"> </text:span><text:span text:style-name="T2">(10/4) </text:span> ⲧϣⲟⲙⲧⲉ ⲛ̅ⲛⲟⲩⲛⲉ ⲛ̅ⲑⲉ ⲉⲧⲟⲩ <text:line-break/><text:span text:style-name="T1"> </text:span><text:span text:style-name="T2">(10/5) </text:span> ϣⲟⲟⲡ ⲙ̅ⲙⲟⲥ ϫⲓⲛⲛ̅ϣⲟⲣ̅ⲡ̅· ⲛⲉ <text:line-break/><text:soft-page-break/><text:span text:style-name="T1"> </text:span><text:span text:style-name="T2">(10/6) </text:span> ⲁϥϭ̅ⲙ̅ϭⲁⲙ ⲡⲉ ⲛ̅ϭⲓ ⲡⲕⲁⲕⲉ ⲉϥⲓ ⲉ‐ <text:line-break/><text:span text:style-name="T1"> </text:span><text:span text:style-name="T2">(10/7) </text:span> ϩⲣⲁⲓ̈ ϩⲁ ⲧⲉϥⲕⲁϭⲓⲁ ⲛⲉϥⲛⲁⲡⲱⲣ̅ϫ̅ <text:line-break/><text:span text:style-name="T1"> </text:span><text:span text:style-name="T2">(10/8) </text:span> ⲁⲛ ⲉⲣⲟϥ ⲡⲉ ⲛ̅ϭⲓ ⲡⲛⲟⲩⲥ· ⲛⲉⲣⲉ <text:line-break/><text:span text:style-name="T1"> </text:span><text:span text:style-name="T2">(10/9) </text:span> ⲕⲉⲇⲩⲛⲁⲙⲓⲥ ⲛⲁⲟⲩⲱⲛ̅ϩ̅ ⲁⲛ ⲉ‐ <text:line-break/><text:span text:style-name="T1"> </text:span><text:span text:style-name="T2">(10/10) </text:span> ⲃⲟⲗ ⲡⲉ· ⲁⲗⲗⲁ ϫⲓⲛⲧⲉϥⲟⲩⲱⲛ̅ϩ̅ <text:line-break/><text:span text:style-name="T1"> </text:span><text:span text:style-name="T2">(10/11) </text:span> ⲉⲃⲟⲗ· ⲧⲟⲧⲉ ⲁⲩⲛⲁⲩ ⲉⲣⲟⲓ̈ ⲡϣⲏⲣⲉ <text:line-break/><text:span text:style-name="T1"> </text:span><text:span text:style-name="T2">(10/12) </text:span> ⲙ̅ⲡⲙⲉⲅⲉⲑⲟⲥ· ϣⲓⲛⲁ ϫⲉ ⲛⲉϥ‐ <text:line-break/><text:span text:style-name="T1"> </text:span><text:span text:style-name="T2">(10/13) </text:span> ϣⲱⲡⲉ ⲛ̅ⲕⲱⲫⲟⲛ ⲛ̅ϭⲓ ⲡⲟⲩⲟⲉⲓⲛ <text:line-break/><text:span text:style-name="T1"> </text:span><text:span text:style-name="T2">(10/14) </text:span> ⲙ̅ⲡ̅ⲡ̅ⲛⲁ̅· ⲛ̅ⲧⲉⲧⲫⲩⲥⲓⲥ ⲣ̅ⲣ̅ⲣⲟ ⲉϩⲣⲁⲓ̈ <text:line-break/><text:span text:style-name="T1"> </text:span><text:span text:style-name="T2">(10/15) </text:span> ⲉϫⲱϥ· ⲉⲡⲓⲇⲏ ⲁϥⲉⲓⲱⲣ̅ⲙ̅ ⲛ̅ⲥⲱⲓ̈ <text:line-break/><text:span text:style-name="T1"> </text:span><text:span text:style-name="T2">(10/16) </text:span> ϩ̅ⲙ̅ ⲡⲟⲩⲱϣ ⲇⲉ ⲛ̅ⲧⲙ̅ⲛⲧ’̅ⲛⲟϭ ⲁϥ‐ <text:line-break/><text:span text:style-name="T1"> </text:span><text:span text:style-name="T2">(10/17) </text:span> ϭⲱⲗ̅ⲡ̅ ⲉⲃⲟⲗ ⲛ̅ϭⲓ ⲡⲁϣⲱϣ· ϣⲓ‐ <text:line-break/><text:span text:style-name="T1"> </text:span><text:span text:style-name="T2">(10/18) </text:span> ⲛⲁ ⲉϥⲛⲁⲟⲩⲱⲛ̅ϩ̅ ⲉⲃⲟⲗ ⲛ̅ϭⲓ ⲡⲉⲧ’‐ <text:line-break/><text:span text:style-name="T1"> </text:span><text:span text:style-name="T2">(10/19) </text:span> ϣⲟⲟⲡ ⲛ̅ⲧⲉ ⲧⲇⲩⲛⲁⲙⲓⲥ· ⲛ̅ⲧⲟ‐ <text:line-break/><text:span text:style-name="T1"> </text:span><text:span text:style-name="T2">(10/20) </text:span> ⲧⲉ ⲧⲛⲟϭ ⲛ̅ⲇⲩⲛⲁⲙⲓⲥ ⲉⲣϣⲱⲡⲉ· <text:line-break/><text:span text:style-name="T1"> </text:span><text:span text:style-name="T2">(10/21) </text:span> ⲁⲩⲱ ⲁⲛⲟⲕ ⲡⲉ ⲡⲟⲩⲟⲉⲓⲛ ⲉⲧ’‐ <text:line-break/><text:span text:style-name="T1"> </text:span><text:span text:style-name="T2">(10/22) </text:span> ϫⲏⲕ ⲉⲃⲟⲗ ⲉⲧ̅ⲙ̅ⲡⲥⲁⲛϩⲣⲉ ⲙ̅ⲡ̅ⲡ̅ⲛⲁ̅ <text:line-break/><text:span text:style-name="T1"> </text:span><text:span text:style-name="T2">(10/23) </text:span> ⲙ̅ⲛ̅ ⲡⲕⲁⲕⲉ· ⲡ〈ⲣ〉ⲉϥϯ ϣⲓⲡⲉ ⲙ̅ⲡⲕⲁ‐ <text:line-break/><text:span text:style-name="T1"> </text:span><text:span text:style-name="T2">(10/24) </text:span> ⲕⲉ ϩ̅ⲛ̅ ⲧⲕⲟⲓⲛⲱⲛⲓⲁ ⲛ̅ⲧ’̅ⲧ〈ⲣ〉ⲓⲃⲏ ⲛ̅‐ <text:line-break/><text:span text:style-name="T1"> </text:span><text:span text:style-name="T2">(10/25) </text:span> ⲁⲕⲁⲑⲁⲣⲧⲟⲛ· ϩ̅ⲙ̅ ⲡ̅ⲡⲱϣⲉ ⲅⲁⲣ <text:line-break/><text:span text:style-name="T1"> </text:span><text:span text:style-name="T2">(10/26) </text:span> ⲛ̅ⲧⲫⲩⲥⲓⲥ ⲉⲡⲙⲉⲅⲉⲑⲟⲥ ⲟⲩⲱ‐ <text:line-break/><text:span text:style-name="T1"> </text:span><text:span text:style-name="T2">(10/27) </text:span> ϣⲉ ⲉⲩⲣ̅ⲥⲕⲉⲡⲁⲍⲉ ⲙ̅ⲙⲟϥ ϩ̅ⲛ̅ ⲟⲩ‐ <text:line-break/><text:span text:style-name="T1"> </text:span><text:span text:style-name="T2">(10/28) </text:span> ⲧⲓⲙⲏ ⲉϩⲣⲁⲓ̈ ⲉⲡϫⲓⲥⲉ ⲙ̅ⲡⲙⲉⲉⲩⲉ <text:line-break/><text:span text:style-name="T1"> </text:span><text:span text:style-name="T2">(10/29) </text:span> ⲙ̅ⲡ̅ⲡ̅ⲛⲁ̅· ⲁⲩⲱ ⲛⲉⲣⲉⲡ̅ⲡ̅ⲛⲁ̅ ϫⲓ ⲁ‐ <text:line-break/><text:span text:style-name="T1"> </text:span><text:span text:style-name="T2">(10/30) </text:span> ⲛⲁⲡⲁⲩⲥⲓⲥ ϩ̅ⲛ̅ ⲧⲉϥⲇⲩⲛⲁⲙⲓⲥ· <text:line-break/><text:span text:style-name="T1"> </text:span><text:span text:style-name="T2">(10/31) </text:span> ⲡⲓⲛⲉ ⲅⲁⲣ ⲙ̅ⲡⲟⲩⲟⲉⲓⲛ ⲟⲩⲁⲧ’ <text:line-break/><text:span text:style-name="T1"> </text:span><text:span text:style-name="T2">(10/32) </text:span> ⲡⲱϣⲉ ⲡⲉ ⲁⲡⲡ̅ⲛ̅ⲁ̅ ⲛ̅ⲁⲅⲉⲛⲛⲏ <text:line-break/><text:span text:style-name="T1"> </text:span><text:span text:style-name="T2">(10/33) </text:span> ⲧⲟⲛ· ⲁⲩⲱ ⲙ̅ⲡⲟⲩⲣ̅ⲟⲛⲟⲙⲁⲍⲉ <text:line-break/><text:span text:style-name="T1"> </text:span><text:span text:style-name="T2">(10/34) </text:span> ⲙ̅ⲙⲟϥ ⲉⲃⲟⲗ ϩ̅ⲛ̅ ⲛ̅ⲕⲗⲟⲟⲗⲉ ⲧⲏ‐ <text:line-break/><text:span text:style-name="T1"> </text:span><text:span text:style-name="T2">(10/35) </text:span> ⲣⲟⲩ ⲛ̅ⲧⲫⲩⲥⲓⲥ· ⲟⲩⲇⲉ ⲙ̅ⲙ̅ⲛ̅‐ <text:line-break/><text:span text:style-name="T1"> </text:span><text:span text:style-name="T2">(10/36) </text:span> ϭⲟⲙ ⲛ̅ⲣ̅ⲟⲛⲟⲙⲁⲍⲉ ⲙ̅ⲙⲟϥ <text:line-break/><text:span text:style-name="T1"> </text:span><text:span text:style-name="T2">(10/37) </text:span> ⲛ̅ϭⲓ ⲛⲉⲧⲣ̅ⲛⲟⲙⲟⲑⲉⲧⲓ· ⲉⲓⲛⲉ <text:line-break/><text:span text:style-name="T1"> </text:span><text:span text:style-name="T2">(11/1) </text:span> ⲅ̣ⲁⲣ ⲛⲓⲙ ⲛ̅ⲧⲁⲧⲫⲩⲥⲓⲥ ⲡⲁϣ̅ϥ̅ <text:line-break/><text:span text:style-name="T1"> </text:span><text:span text:style-name="T2">(11/2) </text:span> ⲉϥϣⲟⲟⲡ ⲛ̅ⲇⲩⲛⲁⲙⲓⲥ ⲙ̅ⲡⲕⲱ‐ <text:line-break/><text:span text:style-name="T1"> </text:span><text:span text:style-name="T2">(11/3) </text:span> ϩ̅ⲧ̅’̅ ⲉⲧ’ϣⲧ̅ⲣ̅ⲧⲱⲣ· ⲉⲧⲉ ⲡⲉⲥⲡⲉⲣ‐ <text:line-break/><text:span text:style-name="T1"> </text:span><text:span text:style-name="T2">(11/4) </text:span> ⲙⲁ ⲡⲉ ⲛ̅〈ϩ〉ⲩⲗⲓⲕⲟⲛ· ⲡⲣⲉϥϫⲓ ⲉⲣⲟϥ <text:line-break/><text:span text:style-name="T1"> </text:span><text:span text:style-name="T2">(11/5) </text:span> ⲛ̅ⲧⲇⲩⲛⲁⲙⲓⲥ ⲙ̅ⲡⲕⲁⲕⲉ ⲁϥⲟⲧⲡ̅ⲥ̅ <text:line-break/><text:span text:style-name="T1"> </text:span><text:span text:style-name="T2">(11/6) </text:span> ⲉϩⲟⲩⲛ ⲉⲧⲙⲏⲧⲉ ⲛ̅ⲛⲉⲥⲙⲉⲗⲟⲥ· <text:line-break/><text:span text:style-name="T1"> </text:span><text:span text:style-name="T2">(11/7) </text:span> ϩ̅ⲙ̅ ⲡⲟⲩⲱϣ ⲇⲉ ⲙ̅ⲡⲙⲉⲅⲉⲑⲟⲥ <text:line-break/><text:span text:style-name="T1"> </text:span><text:span text:style-name="T2">(11/8) </text:span> ϣⲓⲛⲁ ⲉⲩⲛⲁϩⲁⲣⲉϩ ⲉⲡⲛⲟⲩⲥ· <text:line-break/><text:span text:style-name="T1"> </text:span><text:span text:style-name="T2">(11/9) </text:span> ⲁⲩⲱ ⲡⲟⲩⲟⲉⲓⲛ ⲧⲏⲣ̅ϥ̅ ⲙ̅ⲡ̅ⲡ̅ⲛⲁ̅ <text:line-break/><text:span text:style-name="T1"> </text:span><text:span text:style-name="T2">(11/10) </text:span> ⲁⲡⲃⲁⲣⲟⲥ ⲛⲓⲙ· ⲙ̅ⲛ̅ ⲡϩ̅ⲓ̅ⲥⲉ ⲛ̅ⲧ’̅‐ <text:line-break/><text:span text:style-name="T1"> </text:span><text:span text:style-name="T2">(11/11) </text:span> ⲫⲩⲥⲓⲥ· ⲁⲩⲥⲙⲏ ⲉⲓ ⲉⲃⲟⲗ ϩ̅ⲓ̅ⲧ̅ⲙ̅ <text:line-break/><text:span text:style-name="T1"> </text:span><text:span text:style-name="T2">(11/12) </text:span> ⲡ̅ⲡ̅ⲛ̅ⲁ̅ ⲉϫ̅ⲛ̅ ⲧⲕⲗⲟⲟⲗⲉ ⲙ̅ⲫⲩⲙⲏⲛ <text:line-break/><text:span text:style-name="T1"> </text:span><text:span text:style-name="T2">(11/13) </text:span> ⲁⲩⲱ ⲡⲟⲩⲟⲉⲓⲛ ⲙ̅ⲡ̅ⲑⲁⲩⲙⲁ ⲁϥ‐ <text:line-break/><text:span text:style-name="T1"> </text:span><text:span text:style-name="T2">(11/14) </text:span> ϫⲓ ⲁⲣⲭⲏ ⲉⲧⲣⲉϥϯⲁⲗⲏⲗ ϩ̅ⲙ̅ ⲡϩⲣⲟⲟⲩ <text:line-break/><text:span text:style-name="T1"> </text:span><text:span text:style-name="T2">(11/15) </text:span> ⲉⲛⲧⲁⲩⲣ̅ⲭⲁⲣⲓⲍⲉ ⲙ̅ⲙⲟϥ ⲛⲁϥ· <text:line-break/><text:soft-page-break/><text:span text:style-name="T1"> </text:span><text:span text:style-name="T2">(11/16) </text:span> ⲁⲩⲱ ⲡⲛⲟϭ ⲙ̅ⲡ̅ⲛ̅ⲁ̅ ⲛ̅ⲟⲩⲟⲉⲓⲛ ⲛⲉϥ <text:line-break/><text:span text:style-name="T1"> </text:span><text:span text:style-name="T2">(11/17) </text:span> ϩ̅ⲛ̅ ⲧⲕⲗⲟⲟⲗⲉ ⲙ̅ⲫⲩⲙⲏⲛ ⲁϥⲣ̅ⲧⲓ‐ <text:line-break/><text:span text:style-name="T1"> </text:span><text:span text:style-name="T2">(11/18) </text:span> ⲙⲁ ⲙ̅ⲡⲟⲩⲟⲉⲓⲛ ⲉⲧⲉ ⲙ̅ⲙ̅ⲛ̅ⲧⲉϥ <text:line-break/><text:span text:style-name="T1"> </text:span><text:span text:style-name="T2">(11/19) </text:span> ⲁⲣⲏϫ̅ϥ̅· ⲁⲩⲱ ⲡⲓⲛⲉ ⲛ̅ⲕⲁⲑⲟⲗⲓ‐ <text:line-break/><text:span text:style-name="T1"> </text:span><text:span text:style-name="T2">(11/20) </text:span> ⲕⲟⲛ ⲉⲧⲉ ⲁⲛⲟⲕ ⲡⲉ· ⲡϣⲏⲣⲉ ⲙ̅‐ <text:line-break/><text:span text:style-name="T1"> </text:span><text:span text:style-name="T2">(11/21) </text:span> ⲡⲙⲉⲅⲉⲑⲟⲥ· ⲉ〈ϥ〉ϫⲱ ⲙ̅ⲙⲟϥ <text:line-break/><text:span text:style-name="T1"> </text:span><text:span text:style-name="T2">(11/22) </text:span> ϫⲉ ⲁ̅ⲛ̅ⲁ̅ⲥ̅ⲥ̅ⲏ̅ⲥ̅ ⲇ̅ⲩⲥⲏⲥ̅· ⲛ̅ⲧⲟⲕ ⲡⲉ <text:line-break/><text:span text:style-name="T1"> </text:span><text:span text:style-name="T2">(11/23) </text:span> ⲡⲟⲩⲟⲉⲓⲛ ⲉⲧⲉ ⲙ̅ⲙ̅ⲛ̅ⲧⲉϥ ⲁⲣⲏϫ̅ϥ̅ <text:line-break/><text:span text:style-name="T1"> </text:span><text:span text:style-name="T2">(11/24) </text:span> ⲡⲁⲓ̈ ⲛ̅ⲧⲁⲩⲧⲁⲁϥ ϩ̅ⲓ̅ⲧ̅ⲙ̅ ⲡⲟⲩⲱϣ <text:line-break/><text:span text:style-name="T1"> </text:span><text:span text:style-name="T2">(11/25) </text:span> ⲙ̅ⲡⲙⲉⲅⲉⲑⲟⲥ ⲉⲧⲣⲉϥⲣ̅ⲕⲁⲧⲟⲣ <text:line-break/><text:span text:style-name="T1"> </text:span><text:span text:style-name="T2">(11/26) </text:span> ⲑⲟⲩ ⲛ̅ⲟⲩⲟⲉⲓⲛ ⲛⲓⲙ ⲛ̅ⲧⲉ ⲡ̅ⲛ̅ⲁ̅· <text:line-break/><text:span text:style-name="T1"> </text:span><text:span text:style-name="T2">(11/27) </text:span> ϩ̅ⲓ̅ϫ̅ⲙ̅ ⲡⲧⲟⲡⲟⲥ· ⲁⲩⲱ ⲁⲣ̅ⲙⲉⲣⲓ‐ <text:line-break/><text:span text:style-name="T1"> </text:span><text:span text:style-name="T2">(11/28) </text:span> ⲍⲉ ⲙ̅ⲡⲛⲟⲩⲥ ⲉⲃⲟⲗ ϩ̅ⲙ̅ ⲡⲕⲁⲕⲉ· <text:line-break/><text:span text:style-name="T1"> </text:span><text:span text:style-name="T2">(11/29) </text:span> ⲛⲉⲟⲩⲡⲉⲧⲉϣϣⲉ ⲅⲁⲣ ⲁⲛ ⲡⲉ <text:line-break/><text:span text:style-name="T1"> </text:span><text:span text:style-name="T2">(11/30) </text:span> ⲉⲧⲣⲉⲡⲟⲩⲟⲉⲓⲛ ⲙ̅ⲡ̅ⲡ̅ⲛⲁ̅ ϭⲱ <text:line-break/><text:span text:style-name="T1"> </text:span><text:span text:style-name="T2">(11/31) </text:span> ϩ̅ⲛ̅ ⲉⲙ̅ⲛ̅ⲧⲉ· ⲛ̅ⲧⲁⲣⲉⲕⲟⲩⲱϣ <text:line-break/><text:span text:style-name="T1"> </text:span><text:span text:style-name="T2">(11/32) </text:span> ⲅⲁⲣ ⲁϥϫⲓⲥⲉ ⲛ̅ϭⲓ ⲡ̅ⲛ̅ⲁ̅ ⲉⲧⲣⲉϥ <text:line-break/><text:span text:style-name="T1"> </text:span><text:span text:style-name="T2">(11/33) </text:span> ⲣ̅ⲑⲉⲱⲣⲓ ⲙ̅ⲡⲉⲕⲙⲉⲅⲉⲑⲟⲥ· <text:line-break/><text:span text:style-name="T1"> </text:span><text:span text:style-name="T2">(11/34) </text:span> ⲛⲉⲛⲧⲁⲉⲓϫⲟⲟⲩ ⲅⲁⲣ ⲉⲣⲟⲕ <text:line-break/><text:span text:style-name="T1"> </text:span><text:span text:style-name="T2">(11/35) </text:span> ⲥⲏⲉⲙ ϣⲓⲛⲁ ϫⲉ 〈ⲉ〉ⲕⲛⲁⲣ̅ⲛⲟⲉⲓ <text:line-break/><text:span text:style-name="T1"> </text:span><text:span text:style-name="T2">(12/1) </text:span> ϫⲉ ⲡⲁⲉⲓⲛⲉ ⲡϣⲏⲣⲉ ⲙ̅ⲡⲙⲉ̣[ⲅⲉ] <text:line-break/><text:span text:style-name="T1"> </text:span><text:span text:style-name="T2">(12/2) </text:span> ⲑⲟⲥ· ⲟⲩⲉⲃⲟⲗ ⲡⲉ ϩ̅ⲙ̅ ⲡⲁⲙⲉ <text:line-break/><text:span text:style-name="T1"> </text:span><text:span text:style-name="T2">(12/3) </text:span> ⲉⲩⲉ ⲉⲧⲉ ⲙ̅ⲙ̅ⲛ̅ⲧⲉϥ ⲁⲣⲏϫ̅ϥ̅· ⲉⲉⲓ̣ <text:line-break/><text:span text:style-name="T1"> </text:span><text:span text:style-name="T2">(12/4) </text:span> ϣⲟⲟⲡ ⲛⲁϥ ⲛ̅ⲉⲓⲛⲉ ⲛ̅ⲕⲁⲑⲟⲗⲓⲕⲟⲛ <text:line-break/><text:span text:style-name="T1"> </text:span><text:span text:style-name="T2">(12/5) </text:span> ⲛ̅ⲛⲁⲧ’ϫⲓ ϭⲟⲗ· ⲉⲓ̈ϣⲟⲟⲡ ⲙ̅ⲡⲥⲁⲛ <text:line-break/><text:span text:style-name="T1"> </text:span><text:span text:style-name="T2">(12/6) </text:span> ϩⲣⲉ ⲛ̅ⲁⲗⲏⲑⲓⲁ ⲛⲓⲙ· ⲁⲩⲱ ⲛ̅ⲁⲣⲭⲏ <text:line-break/><text:span text:style-name="T1"> </text:span><text:span text:style-name="T2">(12/7) </text:span> ⲙ̅ⲡϣⲁϫⲉ· ⲡⲉϥⲟⲩⲱⲛ̅ϩ̅ ⲉⲃⲟⲗ ϩ̅ⲛ̅ <text:line-break/><text:span text:style-name="T1"> </text:span><text:span text:style-name="T2">(12/8) </text:span> ⲧⲁϩ̅ⲃ̅ⲥⲱ ⲛ̅ⲟⲩⲟⲉⲓⲛ ⲉⲧⲛⲉⲥⲱⲥ· <text:line-break/><text:span text:style-name="T1"> </text:span><text:span text:style-name="T2">(12/9) </text:span> ⲉⲧⲉ ⲧⲥⲙⲏ ⲧⲉ ⲙ̅ⲡⲙⲉⲉⲩⲉ ⲉⲧⲉ <text:line-break/><text:span text:style-name="T1"> </text:span><text:span text:style-name="T2">(12/10) </text:span> ⲙ̅ⲙ̅ⲛ̅ⲧⲉϥ ϣⲓ· ⲁⲛⲟⲛ ⲡⲉ ⲡⲓⲟⲩⲟ‐ <text:line-break/><text:span text:style-name="T1"> </text:span><text:span text:style-name="T2">(12/11) </text:span> ⲉⲓⲛ ⲛ̅ⲟⲩⲱⲧ’ ⲉⲣϣⲱⲡⲉ ⲟⲩⲁⲁϥ· <text:line-break/><text:span text:style-name="T1"> </text:span><text:span text:style-name="T2">(12/12) </text:span> ⲁϥⲟⲩⲱⲛ̅ϩ̅ ⲉⲃⲟⲗ ϩ̅ⲛ̅ ⲕⲉⲛⲟⲩⲛⲉ <text:line-break/><text:span text:style-name="T1"> </text:span><text:span text:style-name="T2">(12/13) </text:span> ϣⲓⲛⲁ ⲉⲩⲛⲁⲛⲉϩⲥⲉ ⲛ̅ⲧⲇⲩⲛⲁ‐ <text:line-break/><text:span text:style-name="T1"> </text:span><text:span text:style-name="T2">(12/14) </text:span> ⲙⲓⲥ ⲙ̅ⲡ̅ⲡ̅ⲛⲁ̅ ⲉⲃⲟⲗ ϩ̅ⲛ̅ ⲧⲫⲩⲥⲓⲥ <text:line-break/><text:span text:style-name="T1"> </text:span><text:span text:style-name="T2">(12/15) </text:span> ⲛ̅ϭⲱⲃ· ϩ̅ⲙ̅ ⲡⲟⲩⲱϣⲉ ⲅⲁⲣ ⲙ̅ⲡ̅‐ <text:line-break/><text:span text:style-name="T1"> </text:span><text:span text:style-name="T2">(12/16) </text:span> ⲛⲟϭ ⲛ̅ⲟⲩⲟⲉⲓⲛ ⲁⲓ̈ⲉ̅ⲓ̅ ⲉⲃⲟⲗ ϩ̅ⲙ̅ ⲡ̅ⲛⲁ̅ <text:line-break/><text:span text:style-name="T1"> </text:span><text:span text:style-name="T2">(12/17) </text:span> ⲉⲧ’ϫⲟⲥⲉ ⲉϩⲣⲁⲓ̈ ⲉⲧⲕⲗⲟⲟⲗⲉ ⲙ̅‐ <text:line-break/><text:span text:style-name="T1"> </text:span><text:span text:style-name="T2">(12/18) </text:span> ⲫⲩⲙⲏⲛ· ⲭⲱⲣⲓⲥ ⲧⲁϩ̅ⲃ̅ⲥⲱ ⲛ̅ⲕⲁ‐ <text:line-break/><text:span text:style-name="T1"> </text:span><text:span text:style-name="T2">(12/19) </text:span> ⲑⲟⲗⲓⲕⲟⲛ· ⲁⲩⲱ ⲁⲡⲗⲟⲅⲟⲥ ϣⲟ‐ <text:line-break/><text:span text:style-name="T1"> </text:span><text:span text:style-name="T2">(12/20) </text:span> ⲡ̅ⲧ̅’̅ ⲉⲣⲟϥ ⲉⲃⲟⲗ ϩ̅ⲓ̅ⲧ̅ⲙ̅ ⲡ̅ⲛⲁ̅· ϩ̅ⲛ̅ ⲧϣⲟ‐ <text:line-break/><text:span text:style-name="T1"> </text:span><text:span text:style-name="T2">(12/21) </text:span> ⲣⲡ̅ ⲛ̅ⲕⲗⲟⲟⲗⲉ ⲙ̅ⲫⲩⲙⲏⲛ ⲛ̅ⲧⲉ <text:line-break/><text:span text:style-name="T1"> </text:span><text:span text:style-name="T2">(12/22) </text:span> ⲧⲫⲩⲥⲓⲥ· ⲁⲩⲱ ⲁⲉⲓⲧⲁⲁϥ ϩ̅ⲓ̅ⲱⲱⲧ’· <text:line-break/><text:span text:style-name="T1"> </text:span><text:span text:style-name="T2">(12/23) </text:span> ⲡⲁⲓ̈ ⲛ̅ⲧⲁϥⲧⲣⲁⲙ̅ⲡϣⲁ ⲙ̅ⲙⲟϥ ⲛ̅‐ <text:line-break/><text:span text:style-name="T1"> </text:span><text:span text:style-name="T2">(12/24) </text:span> ϭⲓ ⲡⲙⲉⲅⲉⲑⲟⲥ ⲁⲩⲱ ⲡ̅ⲡ̅ⲛ̅ⲁ̅ ⲛ̅ⲁⲅⲉⲛ‐ <text:line-break/><text:span text:style-name="T1"> </text:span><text:span text:style-name="T2">(12/25) </text:span> ⲛⲏⲧⲟⲛ· ⲁⲩⲱ ⲁϥⲟⲩⲱⲛ̅ϩ̅ ⲉⲃⲟⲗ <text:line-break/><text:span text:style-name="T1"> </text:span><text:span text:style-name="T2">(12/26) </text:span> ⲛ̅ϭⲓ ⲡⲟⲩⲱ〈ⲛ〉 ⲛ̅ϣⲟⲙⲉⲧ’ ⲛ̅ⲧⲁϩ̅ⲃ̅ <text:line-break/><text:span text:style-name="T1"> </text:span><text:span text:style-name="T2">(12/27) </text:span> ⲥⲱ ϩ̅ⲛ̅ ⲧⲕⲗⲟⲟⲗⲉ ϩ̅ⲙ̅ ⲡⲟⲩⲱϣ <text:line-break/><text:soft-page-break/><text:span text:style-name="T1"> </text:span><text:span text:style-name="T2">(12/28) </text:span> ⲙ̅ⲡⲙⲉⲅⲉⲑⲟⲥ ⲉϩⲣⲁⲓ̈ ⲉⲩⲙⲟⲣⲫⲏ <text:line-break/><text:span text:style-name="T1"> </text:span><text:span text:style-name="T2">(12/29) </text:span> ⲛ̅ⲟⲩⲱⲧ’· ⲁⲩⲱ ⲁⲩⲣ̅ⲥⲕⲉⲡⲁⲍⲉ <text:line-break/><text:span text:style-name="T1"> </text:span><text:span text:style-name="T2">(12/30) </text:span> ⲙ̅ⲡⲁⲉⲓⲛⲉ ϩ̅ⲙ̅ ⲡⲟⲩⲟⲉⲓⲛ ⲛ̅ⲧⲁ‐ <text:line-break/><text:span text:style-name="T1"> </text:span><text:span text:style-name="T2">(12/31) </text:span> ϩ̅ⲃ̅ⲥⲱ· ⲁⲧ’ⲕⲗⲟⲟⲗⲉ ⲇⲉ ϣⲧⲟⲣⲧ̅ⲣ̅ <text:line-break/><text:span text:style-name="T1"> </text:span><text:span text:style-name="T2">(12/32) </text:span> ⲙ̅ⲡⲉⲥⲉϣϥⲓ ⲉϩⲣⲁⲓ̈ ϩⲁ ⲡⲁⲉⲓⲛⲉ· <text:line-break/><text:span text:style-name="T1"> </text:span><text:span text:style-name="T2">(12/33) </text:span> ⲁⲥⲡⲱϩ̅ⲧ̅’̅ ⲉⲃⲟⲗ ⲛ̅ⲧϣⲟⲣ̅ⲡ̅ ⲛ̅ⲇⲩ‐ <text:line-break/><text:span text:style-name="T1"> </text:span><text:span text:style-name="T2">(12/34) </text:span> ⲛⲁⲙⲓⲥ· ⲧⲉⲛⲧⲁⲥϫⲓⲧ[2̅ⲥ̅〉 ⲛ̅ⲧⲟⲟ‐ <text:line-break/><text:span text:style-name="T1"> </text:span><text:span text:style-name="T2">(12/35) </text:span> ⲧ̅ϥ̅ ⲙ̅ⲡ̅ⲡ̅ⲛⲁ̅· ⲧⲁⲓ̈ ⲛ̅ⲧⲁⲥⲣ̅ⲟⲩⲟ‐ <text:line-break/><text:span text:style-name="T1"> </text:span><text:span text:style-name="T2">(12/36) </text:span> ⲉⲓⲛ ⲉⲣⲟϥ ϫⲓⲛϣⲟⲣ̅ⲡ̅ ϩⲁⲧⲉϩⲏ <text:line-break/><text:span text:style-name="T1"> </text:span><text:span text:style-name="T2">(12/37) </text:span> ⲉⲙⲡⲁⲧⲟⲩⲱⲛ̅ϩ̅ ⲉⲃⲟⲗ ϩ̅ⲙ̅ ⲡⲗⲟ‐ <text:line-break/><text:span text:style-name="T1"> </text:span><text:span text:style-name="T2">(12/38) </text:span> ⲅⲟⲥ ⲙ̅ⲡ̅ⲡ̅ⲛⲁ̅· ⲛⲉⲣⲉⲧⲕⲗⲟⲟⲗⲉ <text:line-break/><text:span text:style-name="T1"> </text:span><text:span text:style-name="T2">(13/1) </text:span> ⲛ̣ⲁϣϥⲓ ϩⲁⲣⲟⲟⲩ ⲁⲛ ⲙ̅ⲡ̅ⲥⲛⲁⲩ· <text:line-break/><text:span text:style-name="T1"> </text:span><text:span text:style-name="T2">(13/2) </text:span> ⲡⲟⲩⲟⲉⲓⲛ ⲇⲉ ⲉⲣⲉ̅ⲓ̅ ⲉⲃⲟⲗ ϩ̅ⲛ̅ ⲧⲕⲗⲟ‐ <text:line-break/><text:span text:style-name="T1"> </text:span><text:span text:style-name="T2">(13/3) </text:span> ⲟⲗⲉ· ⲁϥϫⲱⲃⲉ ϩ̅ⲙ̅ ⲡⲕⲁⲣⲱϥ ϣⲁⲛ‐ <text:line-break/><text:span text:style-name="T1"> </text:span><text:span text:style-name="T2">(13/4) </text:span> ⲧ̅ϥ̅ⲉⲓ ⲉϩⲟⲩⲛ ⲉⲧⲙⲉⲥⲟⲧⲏⲥ· ⲁⲩⲱ <text:line-break/><text:span text:style-name="T1"> </text:span><text:span text:style-name="T2">(13/5) </text:span> ⲉⲃⲟⲗ ϩ̅ⲙ̅ ⲡⲟⲩⲱϣ ⲙ̅ⲡⲙⲉⲅⲉⲑⲟⲥ <text:line-break/><text:span text:style-name="T1"> </text:span><text:span text:style-name="T2">(13/6) </text:span> ⲁϥⲧⲱϩ ⲛ̅ⲙ̅ⲙⲁϥ ⲛ̅ϭⲓ ⲡⲟⲩⲟⲉⲓⲛ· <text:line-break/><text:span text:style-name="T1"> </text:span><text:span text:style-name="T2">(13/7) </text:span> ⲡ̅ⲡ̅ⲛ̅ⲁ̅· ⲡⲉⲧ’ϣⲟⲟⲡ ϩ̅ⲙ̅ ⲡⲕⲁⲣⲱϥ <text:line-break/><text:span text:style-name="T1"> </text:span><text:span text:style-name="T2">(13/8) </text:span> ⲡⲉⲛⲧⲁⲩⲡⲟϣ̅ϥ̅ ⲉⲃⲟⲗ ϩ̅ⲙ̅ ⲡ̅ⲛⲁ̅ <text:line-break/><text:span text:style-name="T1"> </text:span><text:span text:style-name="T2">(13/9) </text:span> ⲛ̅ⲟⲩⲟⲉⲓⲛ· ⲁϥⲡⲱⲣ̅ϫ̅ ⲉⲡⲟⲩⲟⲉⲓⲛ <text:line-break/><text:span text:style-name="T1"> </text:span><text:span text:style-name="T2">(13/10) </text:span> ϩ̅ⲓ̅ⲧ̅ⲛ̅ ⲧⲕⲗⲟⲟⲗⲉ ⲙ̅ⲡⲕⲁⲣⲱϥ· ⲁⲥ‐ <text:line-break/><text:span text:style-name="T1"> </text:span><text:span text:style-name="T2">(13/11) </text:span> ϣⲧⲟⲣⲧ̅ⲣ̅ ⲛ̅ϭⲓ ⲧⲕⲗⲟⲟⲗⲉ· ⲛⲉⲛ̅‐ <text:line-break/><text:span text:style-name="T1"> </text:span><text:span text:style-name="T2">(13/12) </text:span> ⲧⲟϥ ⲡⲉⲧ’ϯ ⲁⲛⲁⲡⲁⲩⲥⲓⲥ ⲙ̅ⲡϣⲁϩ <text:line-break/><text:span text:style-name="T1"> </text:span><text:span text:style-name="T2">(13/13) </text:span> ⲛ̅ⲕⲱϩⲧ’· ⲁϥⲑ̅ⲃ̅ⲃⲓⲟ ⲛ̅ⲧⲙⲏⲧⲣⲁ <text:line-break/><text:span text:style-name="T1"> </text:span><text:span text:style-name="T2">(13/14) </text:span> ⲛ̅ⲕⲁⲕⲉ· ϣⲓⲛⲁ ⲛⲉ〈ⲥ〉ϭⲱⲗ̅ⲡ̅ ⲉⲃⲟⲗ <text:line-break/><text:span text:style-name="T1"> </text:span><text:span text:style-name="T2">(13/15) </text:span> ⲛ̅ⲕⲉⲥⲡⲟⲣⲁ· ⲉⲃⲟⲗ ϩ̅ⲙ̅ ⲡⲕⲁⲕⲉ ⲁϥ‐ <text:line-break/><text:span text:style-name="T1"> </text:span><text:span text:style-name="T2">(13/16) </text:span> ⲣ̅ⲕⲱⲗⲩⲉ ⲙ̅ⲙⲟⲟⲩ ϩ̅ⲛ̅ ⲧⲙⲉⲥⲟ‐ <text:line-break/><text:span text:style-name="T1"> </text:span><text:span text:style-name="T2">(13/17) </text:span> ⲧⲏⲥ ⲛ̅ⲧⲫⲩⲥⲓⲥ ⲉϩⲟⲩⲛ ⲉⲧⲟⲩ‐ <text:line-break/><text:span text:style-name="T1"> </text:span><text:span text:style-name="T2">(13/18) </text:span> ⲑⲉⲥⲓⲥ· ⲡⲁⲓ̈ ⲛⲉϥϣⲟⲟⲡ ϩⲣⲁⲓ̈ ϩ̅ⲛ̅ <text:line-break/><text:span text:style-name="T1"> </text:span><text:span text:style-name="T2">(13/19) </text:span> ⲧⲕⲗⲟⲟⲗⲉ ⲁⲩϣⲧⲟⲣⲧ̅ⲣ̅ ⲉⲛⲥⲉ‐ <text:line-break/><text:span text:style-name="T1"> </text:span><text:span text:style-name="T2">(13/20) </text:span> ⲥⲟⲟⲩⲛ ⲁⲛ ϫⲉ ⲛⲉⲩⲧⲟ· ⲁⲕⲙⲏⲛ <text:line-break/><text:span text:style-name="T1"> </text:span><text:span text:style-name="T2">(13/21) </text:span> ⲅⲁⲣ ⲛⲉⲧⲉ ⲙ̅ⲙ̅ⲛ̅ⲧⲁⲩ ⲙ̅ⲙⲁⲩ ⲛ̅ⲧ̅‐ <text:line-break/><text:span text:style-name="T1"> </text:span><text:span text:style-name="T2">(13/22) </text:span> ⲫⲣⲟⲛⲏⲥⲓⲥ ⲛ̅ⲕⲁⲑⲟⲗⲓⲕⲏ ⲛ̅ⲧⲉ‐ <text:line-break/><text:span text:style-name="T1"> </text:span><text:span text:style-name="T2">(13/23) </text:span> ⲡ̅ⲡ̅ⲛ̅ⲁ̅· ⲛ̅ⲧⲉⲣⲓⲥⲟⲡⲥ̅ⲡ̅ ⲇⲉ ⲁ‐ <text:line-break/><text:span text:style-name="T1"> </text:span><text:span text:style-name="T2">(13/24) </text:span> ⲛⲟⲕ ⲙ̅ⲡⲉⲙⲉⲅⲉⲑⲟⲥ ϣⲁ ⲡⲟⲩⲟ‐ <text:line-break/><text:span text:style-name="T1"> </text:span><text:span text:style-name="T2">(13/25) </text:span> ⲉⲓⲛ ⲉⲧⲉ ⲙ̅ⲙ̅ⲛ̅ⲧⲉϥ ⲁⲣⲏϫ̅ϥ̅· ϣⲓ‐ <text:line-break/><text:span text:style-name="T1"> </text:span><text:span text:style-name="T2">(13/26) </text:span> ⲛⲁ ⲉⲥⲛⲁϣⲉⲉ̅ⲓ̅ ⲛ̅ϭⲓ ⲧⲇⲩⲛⲁⲙⲓⲥ <text:line-break/><text:span text:style-name="T1"> </text:span><text:span text:style-name="T2">(13/27) </text:span> ⲉⲧ’ϣⲧ̅ⲣ̅ⲧⲱⲣ ⲛ̅ⲧⲉ ⲡ̅ⲡ̅ⲛⲁ̅· ⲁⲩⲱ <text:line-break/><text:span text:style-name="T1"> </text:span><text:span text:style-name="T2">(13/28) </text:span> ⲛ̅ⲥ̅ⲟⲩⲱⲥ̅ϥ̅ ⲛ̅ϭⲓ ⲧⲙⲏⲧⲣⲁ ⲛ̅ⲕⲁ‐ <text:line-break/><text:span text:style-name="T1"> </text:span><text:span text:style-name="T2">(13/29) </text:span> ⲕⲉ· ⲁⲩⲱ ϣⲓⲛⲁ ⲛ̅ⲧⲉⲡⲁⲉⲓⲛⲉ ϭⲱ‐ <text:line-break/><text:span text:style-name="T1"> </text:span><text:span text:style-name="T2">(13/30) </text:span> ⲗ̅ⲡ̅ ⲉⲃⲟⲗ ϩ̅ⲛ̅ ⲧⲕⲗⲟⲟⲗⲉ ⲙ̅ⲫⲩⲙⲏⲛ· <text:line-break/><text:span text:style-name="T1"> </text:span><text:span text:style-name="T2">(13/31) </text:span> ϩⲱⲥ ⲉⲓ̈ϣⲟⲟⲡ ⲉⲓ̈ϭⲟⲟⲗⲉ ⲙ̅ⲡⲟⲩ‐ <text:line-break/><text:span text:style-name="T1"> </text:span><text:span text:style-name="T2">(13/32) </text:span> ⲟⲉⲓⲛ ⲙ̅ⲡ̅ⲡ̅ⲛⲁ̅· ⲡⲁⲓ̈ ⲛ̅ⲧⲁϥⲙⲟⲟ‐ <text:line-break/><text:span text:style-name="T1"> </text:span><text:span text:style-name="T2">(13/33) </text:span> ϣⲉ ϩ̅ⲓ̅ⲧⲁⲉϩⲏ· ⲁⲩⲱ ⲉⲃⲟⲗ ϩ̅ⲙ̅ ⲡⲟⲩ‐ <text:line-break/><text:span text:style-name="T1"> </text:span><text:span text:style-name="T2">(13/34) </text:span> ⲱϣⲉ ⲙ̅ⲡⲙⲉⲅⲉⲑⲟⲥ ⲁⲩⲱ ⲉⲃⲟⲗ <text:line-break/><text:span text:style-name="T1"> </text:span><text:span text:style-name="T2">(13/35) </text:span> ϩ̅ⲙ̅ ⲡⲥⲟⲡⲥ̅ⲡ̅ ⲁⲉⲓϣⲱⲡⲉ ϩ̅ⲛ̅ ⲧⲕⲗⲟ‐ <text:line-break/><text:span text:style-name="T1"> </text:span><text:span text:style-name="T2">(13/36) </text:span> ⲟⲗⲉ ϣⲓⲛⲁ ⲉⲃⲟⲗ ϩ̅ⲛ̅ ⲧⲁϩ̅ⲃ̅ⲥⲱ <text:line-break/><text:soft-page-break/><text:span text:style-name="T1"> </text:span><text:span text:style-name="T2">(13/37) </text:span> ⲡⲁⲓ̈ ⲛⲉϥϣⲟⲟⲡ ⲉⲃⲟⲗ ϩ̅ⲛ̅ ⲧⲇⲩⲛⲁ‐ <text:line-break/><text:span text:style-name="T1"> </text:span><text:span text:style-name="T2">(14/1) </text:span> ⲙⲓⲥ ⲙ̅ⲡ̅ⲛ̅ⲁ̅ ⲛ̅ⲧⲉ ⲡ̅ⲡⲗⲏⲣⲱⲙ̣[ⲁ] <text:line-break/><text:span text:style-name="T1"> </text:span><text:span text:style-name="T2">(14/2) </text:span> ⲙ̅ⲡⲗⲟⲅⲟⲥ ⲛ̅ϫⲓⲛ ⲙ̅ⲙⲉⲗⲟⲥ ⲛⲁ[ⲓ̈] <text:line-break/><text:span text:style-name="T1"> </text:span><text:span text:style-name="T2">(14/3) </text:span> ⲛⲉⲩⲛ̅ⲧⲁⲟⲩϥ ϩ̅ⲙ̅ ⲡⲕⲁⲕⲉ· ⲉ‐ <text:line-break/><text:span text:style-name="T1"> </text:span><text:span text:style-name="T2">(14/4) </text:span> ⲧⲃⲏⲏⲧⲟⲩ ⲅⲁⲣ ⲁⲉⲓⲟⲩⲱⲛ̅ϩ̅ ⲉ‐ <text:line-break/><text:span text:style-name="T1"> </text:span><text:span text:style-name="T2">(14/5) </text:span> ⲃⲟⲗ ϩ̅ⲙ̅ ⲡⲉⲓ̈ⲉⲗⲁⲭⲓⲥⲧⲟⲥ ⲛ̅ⲧⲟ‐ <text:line-break/><text:span text:style-name="T1"> </text:span><text:span text:style-name="T2">(14/6) </text:span> ⲡⲟⲥ· ⲉⲓ̈ϣⲟⲟⲡ ⲅⲁⲣ ⲛ̅ⲃⲟⲏⲑⲟⲥ <text:line-break/><text:span text:style-name="T1"> </text:span><text:span text:style-name="T2">(14/7) </text:span> ⲛ̅ⲟⲩⲟⲛ ⲛⲓⲙ ⲛ̅ⲧⲁⲩⲣ̅ⲟⲛⲟⲙⲁⲍⲉ <text:line-break/><text:span text:style-name="T1"> </text:span><text:span text:style-name="T2">(14/8) </text:span> ⲙ̅ⲙⲟϥ· ⲛ̅ⲧⲉⲣⲓⲟⲩⲱⲛ̅ϩ̅ ⲅⲁⲣ ⲉⲃⲟⲗ <text:line-break/><text:span text:style-name="T1"> </text:span><text:span text:style-name="T2">(14/9) </text:span> ϩ̅ⲛ̅ ⲧⲕⲗⲟⲟⲗⲉ ⲁϥϫⲓ ⲁⲣⲭⲏ ⲛ̅ϭⲓ ⲡⲟⲩ‐ <text:line-break/><text:span text:style-name="T1"> </text:span><text:span text:style-name="T2">(14/10) </text:span> ⲟⲉⲓⲛ ⲙ̅ⲡ̅ⲡ̅ⲛⲁ̅ ⲉⲧⲣⲉϥⲛⲁϩⲙⲉϥ <text:line-break/><text:span text:style-name="T1"> </text:span><text:span text:style-name="T2">(14/11) </text:span> ⲉⲡⲙⲟⲟⲩ ⲛ̅ϩ̅ⲣ̅ⲧⲉ· ⲙ̅ⲛ̅ ⲛ̅ⲕⲗⲟⲟⲗⲉ <text:line-break/><text:span text:style-name="T1"> </text:span><text:span text:style-name="T2">(14/12) </text:span> ⲛ̅ⲕⲱϩ̅ⲧ̅’̅ ⲛⲁⲓ̈ ⲛ̅ⲧⲁⲩⲡⲟⲣϫⲟⲩ <text:line-break/><text:span text:style-name="T1"> </text:span><text:span text:style-name="T2">(14/13) </text:span> ⲉⲃⲟⲗ ϩ̅ⲛ̅ ⲧⲫⲩⲥⲓⲥ ⲛ̅ⲕⲁⲕⲉ· ⲁⲩⲱ <text:line-break/><text:span text:style-name="T1"> </text:span><text:span text:style-name="T2">(14/14) </text:span> ⲁⲉⲓϯ ⲛⲁⲩ ⲛ̅ⲟⲩⲧⲓⲙⲏ ϣⲁ ⲉⲛⲉϩ <text:line-break/><text:span text:style-name="T1"> </text:span><text:span text:style-name="T2">(14/15) </text:span> ϫⲉⲕⲁⲁⲥ ⲛ̅ⲛⲟⲩⲥⲱⲧ’ ⲁⲧⲱϩ <text:line-break/><text:span text:style-name="T1"> </text:span><text:span text:style-name="T2">(14/16) </text:span> ⲙ̅ⲛ̅ ⲧ̅’ⲧⲣⲓⲃⲏ ⲉⲧ’ϫⲁϩ̅ⲙ̅· ⲡⲟⲩⲟ‐ <text:line-break/><text:span text:style-name="T1"> </text:span><text:span text:style-name="T2">(14/17) </text:span> ⲉⲓⲛ ⲇⲉ ⲉⲧ’ϩ̅ⲙ̅ ⲫⲩⲙⲏⲛ ⲁϥϣⲧⲟⲣ‐ <text:line-break/><text:span text:style-name="T1"> </text:span><text:span text:style-name="T2">(14/18) </text:span> ⲧ̅ⲣ̅ ⲉⲃⲟⲗ ϩ̅ⲛ̅ ⲧⲁⲇⲩⲛⲁⲙⲓⲥ· ⲁⲩⲱ <text:line-break/><text:span text:style-name="T1"> </text:span><text:span text:style-name="T2">(14/19) </text:span> ⲁϥϫⲱⲃⲉ ϩ̅ⲛ̅ ⲧⲁⲙⲉⲥⲟⲧⲏⲥ· ⲁϥ‐ <text:line-break/><text:span text:style-name="T1"> </text:span><text:span text:style-name="T2">(14/20) </text:span> ⲙⲟⲩϩ ⲉⲃⲟⲗ ϩ̅ⲙ̅ ⲡⲙⲉⲉⲩⲉ ⲛ̅ⲕⲁ‐ <text:line-break/><text:span text:style-name="T1"> </text:span><text:span text:style-name="T2">(14/21) </text:span> ⲑⲟⲗⲓⲕⲟⲛ· ⲁⲩⲱ ϩ̅ⲙ̅ ⲡⲗⲟⲅⲟⲥ ⲙ̅‐ <text:line-break/><text:span text:style-name="T1"> </text:span><text:span text:style-name="T2">(14/22) </text:span> ⲡⲟⲩⲟⲉⲓⲛ ⲙ̅ⲡ̅ⲡ̅ⲛⲁ̅ ⲁϥⲕⲟⲧ̅ϥ̅ ⲉ‐ <text:line-break/><text:span text:style-name="T1"> </text:span><text:span text:style-name="T2">(14/23) </text:span> ϩⲣⲁⲓ̈ ⲉⲧⲉϥⲁⲛⲁⲡⲁⲩⲥⲓⲥ· ⲁϥϫⲓ <text:line-break/><text:span text:style-name="T1"> </text:span><text:span text:style-name="T2">(14/24) </text:span> ⲧⲩⲡⲟⲥ ϩ̅ⲛ̅ ⲧⲉϥⲛⲟⲩⲛⲉ· ⲁϥⲣ̅ⲟⲩ‐ <text:line-break/><text:span text:style-name="T1"> </text:span><text:span text:style-name="T2">(14/25) </text:span> ⲟⲉⲓⲛ ⲉϥⲟ ⲛ̅ⲁⲧ’ϣⲧⲁ· ⲡⲟⲩⲟⲉⲓⲛ <text:line-break/><text:span text:style-name="T1"> </text:span><text:span text:style-name="T2">(14/26) </text:span> ⲇⲉ ⲉⲣⲉ̅ⲓ̅ ⲉⲃⲟⲗ ⲛ̅ⲙ̅ⲙⲁϥ ϩ̅ⲙ̅ ⲡⲕⲁ‐ <text:line-break/><text:span text:style-name="T1"> </text:span><text:span text:style-name="T2">(14/27) </text:span> ⲣⲱϥ· ⲁϥⲙⲟⲟϣⲉ ϩ̅ⲛ̅ ⲧⲙⲉⲥⲟ‐ <text:line-break/><text:span text:style-name="T1"> </text:span><text:span text:style-name="T2">(14/28) </text:span> ⲧⲏⲥ ⲁϥⲛⲟⲟⲩϩ̅ϥ̅ ⲉⲡⲧⲟⲡⲟⲥ· <text:line-break/><text:span text:style-name="T1"> </text:span><text:span text:style-name="T2">(14/29) </text:span> ⲁⲩⲱ ⲁⲧ’ⲕⲗⲟⲟⲗⲉ ⲣ̅ⲟⲩⲟⲉⲓⲛ· <text:line-break/><text:span text:style-name="T1"> </text:span><text:span text:style-name="T2">(14/30) </text:span> ⲁⲩⲱ ⲉⲃⲟⲗ ⲛ̅ϩⲏⲧ̅ⲥ̅ ⲁϥϣⲱⲡⲉ <text:line-break/><text:span text:style-name="T1"> </text:span><text:span text:style-name="T2">(14/31) </text:span> ⲛ̅ϭⲓ ⲟⲩⲕⲱϩ̅ⲧ̅’̅ ⲉⲙⲁϥⲱϣ̅ⲙ̅· <text:line-break/><text:span text:style-name="T1"> </text:span><text:span text:style-name="T2">(14/32) </text:span> ⲧⲙⲉⲣⲓⲥ ⲇⲉ ⲉⲧ’ⲡⲱⲣ̅ϫ̅ ⲉⲃⲟⲗ ϩ̅ⲙ̅ <text:line-break/><text:span text:style-name="T1"> </text:span><text:span text:style-name="T2">(14/33) </text:span> ⲡⲑⲁⲩⲙⲁ· ⲁⲥϯ ϩ̅ⲓ̅ⲱⲱⲥ ⲛ̅ⲧ̅ⲃ̅‐ <text:line-break/><text:span text:style-name="T1"> </text:span><text:span text:style-name="T2">(14/34) </text:span> ϣⲉ· ⲁⲩⲣ̅ⲁⲡⲁⲧⲁ ⲙ̅ⲙⲟⲥ ϩ̅ⲓ̅ⲧ̅ⲙ̅ <text:line-break/><text:span text:style-name="T1"> </text:span><text:span text:style-name="T2">(14/35) </text:span> ⲡⲕⲱϩ̅ⲧ̅’̅ ⲛ̅ⲕⲁⲕⲉ· ⲁⲩⲱ ⲁⲡϣⲧⲟⲣ <text:line-break/><text:span text:style-name="T1"> </text:span><text:span text:style-name="T2">(14/36) </text:span> ⲧ̅ⲣ̅ ⲛ̅ⲧⲉ ⲡⲉϥϣⲧⲟⲣⲧ̅ⲣ̅ ⲁϥⲛⲟⲩ‐ <text:line-break/><text:span text:style-name="T1"> </text:span><text:span text:style-name="T2">(14/37) </text:span> ϫⲉ ⲉⲃⲟⲗ ⲙ̅ⲙⲟϥ ⲙ̅ⲡⲃⲁⲣⲟⲥ ⲛ̅ⲧ̅’̅‐ <text:line-break/><text:span text:style-name="T1"> </text:span><text:span text:style-name="T2">(15/1) </text:span> ⲕⲗⲟⲟⲗⲉ· ⲛⲉϥϣⲟⲟⲡ ⲛ̅ⲕⲁ‐ <text:line-break/><text:span text:style-name="T1"> </text:span><text:span text:style-name="T2">(15/2) </text:span> ⲕⲟⲛ ⲉϥⲧⲟⲩⲃⲏⲩ ⲁⲛ· ⲁⲩⲱ ⲁ‐ <text:line-break/><text:span text:style-name="T1"> </text:span><text:span text:style-name="T2">(15/3) </text:span> ⲧⲕⲱϩ̅ⲧ̅’̅ ⲧⲱϩ ⲙ̅ⲛ̅ ⲡⲙⲟⲟⲩ· ⲁ‐ <text:line-break/><text:span text:style-name="T1"> </text:span><text:span text:style-name="T2">(15/4) </text:span> ⲧⲣⲉⲙ̅ⲙⲟⲩⲉⲓⲏ ⲣ̅ⲃⲗⲁⲡⲧⲉⲓ· <text:line-break/><text:span text:style-name="T1"> </text:span><text:span text:style-name="T2">(15/5) </text:span> ⲁⲩⲱ ⲧⲫⲩⲥⲓⲥ ⲛ̅ⲧⲁⲩϣ̅ⲣ̅ϣⲱ <text:line-break/><text:span text:style-name="T1"> </text:span><text:span text:style-name="T2">(15/6) </text:span> ⲣ̅ⲥ̅· ⲁⲥⲧⲱⲱⲛ ϩ̅ⲛ̅ ⲟⲩϭⲉⲡⲏ ⲉ‐ <text:line-break/><text:span text:style-name="T1"> </text:span><text:span text:style-name="T2">(15/7) </text:span> ⲃⲟⲗ ϩ̅ⲛ̅ ⲙ̅ⲙⲟⲩⲉⲓⲟⲟⲩⲉ ⲛ̅ⲁⲣⲅⲟⲛ· <text:line-break/><text:span text:style-name="T1"> </text:span><text:span text:style-name="T2">(15/8) </text:span> ⲡⲉⲥⲃⲱⲕ ⲅⲁⲣ ⲉϩⲣⲁⲓ̈ ⲛⲉⲩϣⲓⲡⲉ <text:line-break/><text:span text:style-name="T1"> </text:span><text:span text:style-name="T2">(15/9) </text:span> ⲡⲉ· ⲁⲧ’ⲫⲩⲥⲓⲥ ⲇⲉ ϫⲓ ⲉⲣⲟⲥ ⲛ̅ⲧ̅’̅‐ <text:line-break/><text:soft-page-break/><text:span text:style-name="T1"> </text:span><text:span text:style-name="T2">(15/10) </text:span> ⲇⲩⲛⲁⲙⲓⲥ ⲛ̅ⲕⲱϩ̅ⲧ̅’̅· ⲁⲥϭ̅ⲙ̅ϭⲟⲙ <text:line-break/><text:span text:style-name="T1"> </text:span><text:span text:style-name="T2">(15/11) </text:span> ⲉⲧⲃⲉ ⲡⲟⲩⲟⲉⲓⲛ ⲙ̅ⲡ̅ⲡ̅ⲛⲁ̅· ⲡⲁⲓ̈ <text:line-break/><text:span text:style-name="T1"> </text:span><text:span text:style-name="T2">(15/12) </text:span> ⲛⲉϥϣⲟⲟⲡ ϩ̅ⲛ̅ ⲧⲫⲩⲥⲓⲥ· ⲁⲡⲉⲥ <text:line-break/><text:span text:style-name="T1"> </text:span><text:span text:style-name="T2">(15/13) </text:span> ⲉⲓⲛⲉ ⲟⲩⲱⲛ̅ϩ̅ ⲉⲃⲟⲗ ϩ̅ⲙ̅ ⲡⲙⲟⲟⲩ <text:line-break/><text:span text:style-name="T1"> </text:span><text:span text:style-name="T2">(15/14) </text:span> ⲙ̅ⲡⲥⲙⲟⲧ’ ⲛ̅ⲟⲩⲑⲏⲣⲓⲟⲛ ⲛ̅ϩ̅ⲣ̅ⲧⲉ <text:line-break/><text:span text:style-name="T1"> </text:span><text:span text:style-name="T2">(15/15) </text:span> ⲉⲛⲁϣⲉ ⲛⲉϥⲡⲣⲟⲥⲱⲡⲟⲛ ⲉϥ‐ <text:line-break/><text:span text:style-name="T1"> </text:span><text:span text:style-name="T2">(15/16) </text:span> ϭⲟⲟⲩϭ ⲙ̅ⲡⲥⲁⲙⲡⲓⲧ̅ⲛ̅· ⲁⲩⲟⲩ‐ <text:line-break/><text:span text:style-name="T1"> </text:span><text:span text:style-name="T2">(15/17) </text:span> ⲟⲉⲓⲛ ⲃⲱⲕ ⲉⲡⲓⲧ̅ⲛ̅ ⲉⲡⲭⲁⲟⲥ ⲉϥ‐ <text:line-break/><text:span text:style-name="T1"> </text:span><text:span text:style-name="T2">(15/18) </text:span> ⲙⲉϩ ⲛ̅ϩⲗⲟⲥⲧ̅ⲛ̅ ϩ̅ⲓ̅ ϣⲟⲉⲓϣ ⲉⲧⲣⲉϥ <text:line-break/><text:span text:style-name="T1"> </text:span><text:span text:style-name="T2">(15/19) </text:span> ⲣ̅ⲃⲗⲁⲡⲧⲉⲓ ⲛ̅ⲧⲫⲩⲥⲓⲥ· ⲡⲟⲩⲟ‐ <text:line-break/><text:span text:style-name="T1"> </text:span><text:span text:style-name="T2">(15/20) </text:span> ⲉⲓⲛ ⲇⲉ ⲙ̅ⲡ̅ⲑⲁⲩⲙⲁ ⲡⲁⲓ̈ ⲛⲉϥϣⲟ‐ <text:line-break/><text:span text:style-name="T1"> </text:span><text:span text:style-name="T2">(15/21) </text:span> ⲟⲡ ϩ̅ⲛ̅ ⲧⲙⲉⲥⲟⲧⲏⲥ· ⲁϥⲉⲓ ϣⲁⲣⲟϥ <text:line-break/><text:span text:style-name="T1"> </text:span><text:span text:style-name="T2">(15/22) </text:span> ϫⲓⲛⲧⲣⲉϥⲛⲟⲩϫⲁ ⲉⲃⲟⲗ ⲙ̅ⲙⲟϥ <text:line-break/><text:span text:style-name="T1"> </text:span><text:span text:style-name="T2">(15/23) </text:span> ⲙ̅ⲡⲃⲁⲣⲟⲥ ⲙ̅ⲡⲕⲁⲕⲉ· ⲁϥⲣⲁϣⲉ <text:line-break/><text:span text:style-name="T1"> </text:span><text:span text:style-name="T2">(15/24) </text:span> ⲛ̅ⲧⲁⲣⲉⲡ̅ⲛ̅ⲁ̅ ϫⲓⲥⲉ· ⲁϥϭⲱϣ̅ⲧ’̅ <text:line-break/><text:span text:style-name="T1"> </text:span><text:span text:style-name="T2">(15/25) </text:span> ⲅⲁⲣ ⲉⲃⲟⲗ ϩ̅ⲛ̅ ⲛ̅ⲕⲗⲟⲟⲗⲉ ⲉⲡⲓⲧ̅ⲛ̅ <text:line-break/><text:span text:style-name="T1"> </text:span><text:span text:style-name="T2">(15/26) </text:span> ⲉⲛⲙⲟⲩⲉⲓⲟⲟⲩⲉ ⲛ̅ⲕⲁⲕⲉ ⲉϫ̅ⲙ̅ <text:line-break/><text:span text:style-name="T1"> </text:span><text:span text:style-name="T2">(15/27) </text:span> ⲡⲟⲩⲟⲉⲓⲛ· ⲡⲁⲓ̈ ⲛⲉϥϣⲟⲟⲡ ϩ̅ⲛ̅ <text:line-break/><text:span text:style-name="T1"> </text:span><text:span text:style-name="T2">(15/28) </text:span> ⲛ̅ⲃⲁⲑⲟⲥ ⲛ̅ⲧⲫⲩⲥⲓⲥ· ⲉⲧⲃⲉⲡⲁⲓ̈ <text:line-break/><text:span text:style-name="T1"> </text:span><text:span text:style-name="T2">(15/29) </text:span> ⲁⲉⲓⲟⲩⲱⲛ̅ϩ̅ ⲉⲃⲟⲗ ϫⲉⲕⲁⲁⲥ ⲉⲓ̈‐ <text:line-break/><text:span text:style-name="T1"> </text:span><text:span text:style-name="T2">(15/30) </text:span> ⲛⲁϫⲓ ⲛ̅ⲟⲩⲁⲫⲟⲣⲙⲏ ⲉⲧⲣⲁⲃⲱⲕ <text:line-break/><text:span text:style-name="T1"> </text:span><text:span text:style-name="T2">(15/31) </text:span> ⲉⲡⲓⲧ̅ⲛ̅ ⲉⲡⲧⲁⲣⲧⲁⲣⲟⲛ ϣⲁ ⲡⲟⲩ‐ <text:line-break/><text:span text:style-name="T1"> </text:span><text:span text:style-name="T2">(15/32) </text:span> ⲟⲉⲓⲛ ⲙ̅ⲡ̅ⲡ̅ⲛⲁ̅ ⲉⲧ̅ⲣ̅ⲃⲁⲣⲓⲥⲑⲁⲓ <text:line-break/><text:span text:style-name="T1"> </text:span><text:span text:style-name="T2">(15/33) </text:span> ϣⲓⲛⲁ ⲉⲓ̈ⲛⲁϩⲁⲣⲉϩ ⲉⲣⲟϥ ⲉⲧⲕⲁ‐ <text:line-break/><text:span text:style-name="T1"> </text:span><text:span text:style-name="T2">(15/34) </text:span> ⲕⲓⲁ ⲙ̅ⲡⲃⲁⲣⲟⲥ· ⲁⲩⲱ ⲉⲃⲟⲗ ϩ̅ⲙ̅ <text:line-break/><text:span text:style-name="T1"> </text:span><text:span text:style-name="T2">(15/35) </text:span> ⲡⲉϥϭⲱϣ̅ⲧ̅’̅ ⲉⲡⲓⲧ̅ⲛ̅ ⲁⲧ’ⲑⲉⲥⲓⲥ <text:line-break/><text:span text:style-name="T1"> </text:span><text:span text:style-name="T2">(15/36) </text:span> ⲛ̅ⲕⲁⲕⲉ· ⲡⲁⲗⲓⲛ ⲁⲡⲟⲩⲟⲉⲓⲛ <text:line-break/><text:span text:style-name="T1"> </text:span><text:span text:style-name="T2">(16/1) </text:span> ⲉⲓ ⲉϩⲣⲁⲓ̈ ϫⲉⲕⲁⲁⲥ ⲟⲛ ⲉⲣⲉⲧⲙ[ⲏ] <text:line-break/><text:span text:style-name="T1"> </text:span><text:span text:style-name="T2">(16/2) </text:span> ⲧⲣⲁ ⲛ̅ⲛⲏⲟⲩ ⲉϩⲣⲁⲓ̈ ϩ̅ⲙ̅ ⲡⲙⲟⲟⲩ <text:line-break/><text:span text:style-name="T1"> </text:span><text:span text:style-name="T2">(16/3) </text:span> ⲁⲥⲉ̅ⲓ̅ ⲉϩⲣⲁⲓ̈ ϩ̅ⲙ̅ ⲡⲁⲟⲩⲱϣ· ϩ̅ⲛ̅ <text:line-break/><text:span text:style-name="T1"> </text:span><text:span text:style-name="T2">(16/4) </text:span> ⲟⲩⲕⲣⲟϥ ⲁϥⲟⲩⲱⲛ ⲛ̅ϭⲓ ⲡⲃⲁⲗ· <text:line-break/><text:span text:style-name="T1"> </text:span><text:span text:style-name="T2">(16/5) </text:span> ⲁⲩⲱ ⲁϥⲣ̅ⲁⲛⲁⲡⲁⲩⲉⲥⲑⲁⲓ ⲛ̅ϭⲓ <text:line-break/><text:span text:style-name="T1"> </text:span><text:span text:style-name="T2">(16/6) </text:span> ⲡⲟⲩⲟⲉⲓⲛ ⲉⲣⲟⲩⲱⲛ̅ϩ̅ ⲉⲃⲟⲗ ϩ̅ⲛ̅ <text:line-break/><text:span text:style-name="T1"> </text:span><text:span text:style-name="T2">(16/7) </text:span> ⲧⲙⲉⲥⲟⲧⲏⲥ· ⲡⲁⲓ̈ ⲉⲣⲡⲱⲣ̅ϫ̅ ⲉⲡ‐ <text:line-break/><text:span text:style-name="T1"> </text:span><text:span text:style-name="T2">(16/8) </text:span> ⲑⲁⲩⲙⲁ· ⲁϥⲣ̅ⲟⲩⲟⲉⲓⲛ ⲉϩⲣⲁⲓ̈ ⲉ‐ <text:line-break/><text:span text:style-name="T1"> </text:span><text:span text:style-name="T2">(16/9) </text:span> ϫⲱⲥ· ⲁⲩⲱ ⲁⲥⲛⲁⲩ ⲛ̅ϭⲓ ⲧⲙⲏ‐ <text:line-break/><text:span text:style-name="T1"> </text:span><text:span text:style-name="T2">(16/10) </text:span> ⲧⲣⲁ ⲉⲛⲉⲧⲉ ⲙ̅ⲡⲉⲥⲛⲁⲩ ⲉⲣⲟⲟⲩ <text:line-break/><text:span text:style-name="T1"> </text:span><text:span text:style-name="T2">(16/11) </text:span> ⲁⲩⲱ ⲁⲥⲣⲁϣⲉ ⲉⲥϯⲁⲗⲏⲗ ϩ̅ⲙ̅ <text:line-break/><text:span text:style-name="T1"> </text:span><text:span text:style-name="T2">(16/12) </text:span> ⲡⲟⲩⲟⲉⲓⲛ· ⲉⲡⲱⲥ ⲁⲛ ⲡⲉ ⲡⲁⲓ̈ <text:line-break/><text:span text:style-name="T1"> </text:span><text:span text:style-name="T2">(16/13) </text:span> ⲉⲣⲟⲩⲱⲛ̅ϩ̅ ⲉⲃⲟⲗ ϩ̅ⲛ̅ ⲧⲙⲉⲥⲟⲧⲏⲥ <text:line-break/><text:span text:style-name="T1"> </text:span><text:span text:style-name="T2">(16/14) </text:span> ϩ̅ⲛ̅ ⲧⲉⲥⲕⲁϭⲓⲁ· ⲛ̅ⲧⲁⲣⲉϥⲣ̅ⲟⲩⲟ <text:line-break/><text:span text:style-name="T1"> </text:span><text:span text:style-name="T2">(16/15) </text:span> ⲉⲓⲛ ⲉϩⲣⲁⲓ̈ ⲉϫⲱⲥ· ⲁⲩⲱ ⲁⲥⲛⲁⲩ <text:line-break/><text:span text:style-name="T1"> </text:span><text:span text:style-name="T2">(16/16) </text:span> ⲛ̅ϭⲓ ⲧⲙⲏⲧⲣⲁ ⲉⲛⲉⲧⲉ ⲙ̅ⲡⲉⲥⲛⲁⲩ <text:line-break/><text:span text:style-name="T1"> </text:span><text:span text:style-name="T2">(16/17) </text:span> ⲉⲣⲟⲟⲩ· ⲁⲩⲱ ⲁⲩⲛ̅ⲧ̅ⲥ̅ ⲉⲡⲓⲧ̅ⲛ̅ <text:line-break/><text:span text:style-name="T1"> </text:span><text:span text:style-name="T2">(16/18) </text:span> ⲉⲡⲙⲟⲟⲩ· ⲛⲉⲥⲙⲉⲉⲩⲉ ⲡⲉ ϫⲉ <text:line-break/><text:span text:style-name="T1"> </text:span><text:span text:style-name="T2">(16/19) </text:span> ⲁⲥⲙⲉⲧⲉ ⲁⲧ’ⲇⲩⲛⲁⲙⲓⲥ ⲛ̅ⲟⲩⲟ‐ <text:line-break/><text:span text:style-name="T1"> </text:span><text:span text:style-name="T2">(16/20) </text:span> ⲉⲓⲛ· ⲁⲩⲱ ⲛⲉⲥⲥⲟⲟⲩⲛ ⲁⲛ ϫⲉ <text:line-break/><text:soft-page-break/><text:span text:style-name="T1"> </text:span><text:span text:style-name="T2">(16/21) </text:span> ⲛⲉⲧⲉⲥⲛⲟⲩⲛⲉ ⲟ̅ ⲛ̅ⲁⲣⲅⲟⲥ ϩ̅ⲓ̅ <text:line-break/><text:span text:style-name="T1"> </text:span><text:span text:style-name="T2">(16/22) </text:span> ⲧ̅ⲙ̅ ⲡⲓⲛⲉ ⲙ̅ⲡⲟⲩⲟⲉⲓⲛ· ⲁⲩⲱ ⲧⲉⲛ <text:line-break/><text:span text:style-name="T1"> </text:span><text:span text:style-name="T2">(16/23) </text:span> ⲧⲁϥⲡⲱⲧ’ ϣⲁⲣⲁⲥ· ⲁϥⲉⲓⲱⲣ̅ⲙ̅ ⲛ̅‐ <text:line-break/><text:span text:style-name="T1"> </text:span><text:span text:style-name="T2">(16/24) </text:span> ϭⲓ ⲡⲟⲩⲟⲉⲓⲛ ⲡⲉⲧ’ϣⲟⲟⲡ ϩ̅ⲛ̅ <text:line-break/><text:span text:style-name="T1"> </text:span><text:span text:style-name="T2">(16/25) </text:span> ⲧⲙⲉⲥⲟⲧⲏⲥ· ⲡⲁⲓ̈ ⲛⲉϥϣⲟⲟⲡ <text:line-break/><text:span text:style-name="T1"> </text:span><text:span text:style-name="T2">(16/26) </text:span> ⲛ̅ⲁⲣⲭⲏ ⲁⲩⲱ ⲛ̅ⲧⲉⲗⲟⲥ· ⲉⲧⲃⲉ <text:line-break/><text:span text:style-name="T1"> </text:span><text:span text:style-name="T2">(16/27) </text:span> ⲡⲁⲓ̈ ⲁⲡⲉϥⲙⲉⲉⲩⲉ ⲉⲓⲱⲣ̅ⲙ̅ ϩ̅ⲛ̅ <text:line-break/><text:span text:style-name="T1"> </text:span><text:span text:style-name="T2">(16/28) </text:span> ⲟⲩϭⲉⲡⲏ ⲉϩⲣⲁⲓ̈ ⲉⲡⲟⲩⲟⲉⲓⲛ ⲉⲧ‐ <text:line-break/><text:span text:style-name="T1"> </text:span><text:span text:style-name="T2">(16/29) </text:span> ϫⲟⲥⲉ· ⲁⲩⲱ ⲁϥⲱϣ ⲉⲃⲟⲗ ⲡⲉ‐ <text:line-break/><text:span text:style-name="T1"> </text:span><text:span text:style-name="T2">(16/30) </text:span> ϫⲁϥ ϫⲉ ⲡϫⲟⲉⲓⲥ ⲛⲁ ⲛⲁⲓ̈· ⲁⲡⲁ‐ <text:line-break/><text:span text:style-name="T1"> </text:span><text:span text:style-name="T2">(16/31) </text:span> ⲟⲩⲟⲉⲓⲛ ⲅⲁⲣ ⲙ̅ⲛ̅ ⲡⲁϩ̅ⲓ̅ⲥⲉ ⲥⲱ‐ <text:line-break/><text:span text:style-name="T1"> </text:span><text:span text:style-name="T2">(16/32) </text:span> ⲣ̅ⲙ̅ ⲉϥⲧ̅ⲙ̅ⲧⲁϩⲟⲉⲓ ⲅⲁⲣ ⲛ̅ϭⲓ ⲡⲉⲕ‐ <text:line-break/><text:span text:style-name="T1"> </text:span><text:span text:style-name="T2">(16/33) </text:span> ⲁⲅⲁⲑⲟⲛ· ϯⲥⲟⲟⲩⲛ ⲅⲁⲣ ⲁⲛ ϫⲉ <text:line-break/><text:span text:style-name="T1"> </text:span><text:span text:style-name="T2">(16/34) </text:span> ⲉⲓ̈ⲧⲱⲛ· ⲛ̅ⲧⲁⲣⲉⲡⲙⲉⲅⲉⲑⲟⲥ <text:line-break/><text:span text:style-name="T1"> </text:span><text:span text:style-name="T2">(16/35) </text:span> ⲇⲉ ⲥⲱⲧ̅ⲙ̅ ⲉⲣⲟϥ ⲁϥⲛⲁ ⲛⲁϥ· <text:line-break/><text:span text:style-name="T1"> </text:span><text:span text:style-name="T2">(16/36) </text:span> ⲁⲩⲱ ⲁⲉⲓⲟⲩⲱⲛ̅ϩ̅ ⲉⲃⲟⲗ ϩ̅ⲛ̅ ⲧⲕⲗⲟ‐ <text:line-break/><text:span text:style-name="T1"> </text:span><text:span text:style-name="T2">(16/37) </text:span> ⲟⲗⲉ ⲙ̅ⲫⲩⲙⲏⲛ ϩ̅ⲙ̅ ⲡⲕⲁⲣⲱϥ <text:line-break/><text:span text:style-name="T1"> </text:span><text:span text:style-name="T2">(17/1) </text:span> ⲛ̣̅ⲟⲩⲉϣ ⲛ̅ⲧⲁϩ̅ⲃ̅ⲥⲱ ⲉⲧⲟⲩⲁⲁⲃ· <text:line-break/><text:span text:style-name="T1"> </text:span><text:span text:style-name="T2">(17/2) </text:span> ϩ̣̅̅ⲙ̅ ⲡⲁⲟⲩⲱϣⲉ ⲁⲉⲓⲣ̅ⲧⲓⲙⲁ ⲛ̅‐ <text:line-break/><text:span text:style-name="T1"> </text:span><text:span text:style-name="T2">(17/3) </text:span> ⲧⲁϩ̅ⲃ̅ⲥⲱ· ⲧⲉⲧⲟ ⲛ̅ϣⲟⲙⲧⲉ ⲙ̅‐ <text:line-break/><text:span text:style-name="T1"> </text:span><text:span text:style-name="T2">(17/4) </text:span> ⲙⲟⲣⲫⲏ ϩ̅ⲛ̅ ⲧⲕⲗⲟⲟⲗⲉ ⲙ̅ⲫⲩⲙⲏⲛ· <text:line-break/><text:span text:style-name="T1"> </text:span><text:span text:style-name="T2">(17/5) </text:span> ⲡⲟⲩⲟⲉⲓⲛ ⲇⲉ ⲉⲧ’ϣⲟⲟⲡ ϩ̅ⲙ̅ <text:line-break/><text:span text:style-name="T1"> </text:span><text:span text:style-name="T2">(17/6) </text:span> ⲡⲕⲁⲣⲱϥ ⲡⲉⲃⲟⲗ ϩ̅ⲛ̅ ⲧⲇⲩⲛⲁⲙⲓⲥ <text:line-break/><text:span text:style-name="T1"> </text:span><text:span text:style-name="T2">(17/7) </text:span> ⲛ̅ⲁⲅⲁⲗⲗⲓⲱⲛ ⲁϥϣⲟⲡ̅ⲧ̅ ⲉⲣⲟϥ· <text:line-break/><text:span text:style-name="T1"> </text:span><text:span text:style-name="T2">(17/8) </text:span> ⲁⲉⲓⲣ̅ⲫⲟⲣⲉⲓ ⲙ̅ⲙⲟϥ· ⲁⲩⲱ ⲡⲉϥ‐ <text:line-break/><text:span text:style-name="T1"> </text:span><text:span text:style-name="T2">(17/9) </text:span> ⲙⲉⲣⲟⲥ ⲥⲛⲁⲩ ⲁⲩⲟⲩⲱⲛ̅ϩ̅ ⲉⲃⲟⲗ <text:line-break/><text:span text:style-name="T1"> </text:span><text:span text:style-name="T2">(17/10) </text:span> ϩ̅ⲛ̅ ⲟⲩⲙⲟⲣⲫⲏ ⲛ̅ⲟⲩⲱⲧ’· ⲛⲉϥ‐ <text:line-break/><text:span text:style-name="T1"> </text:span><text:span text:style-name="T2">(17/11) </text:span> ⲕⲉⲙⲉⲣⲟⲥ ⲙ̅ⲡⲟⲩⲱⲛ̅ϩ̅ ⲉⲃⲟⲗ <text:line-break/><text:span text:style-name="T1"> </text:span><text:span text:style-name="T2">(17/12) </text:span> ⲉⲧⲃⲉ ⲡⲕⲱϩ̅ⲧ̅’̅· ⲁⲉⲓϣⲱⲡⲉ ⲉⲙ‐ <text:line-break/><text:span text:style-name="T1"> </text:span><text:span text:style-name="T2">(17/13) </text:span> ⲡⲓϣ̅ϣⲁϫⲉ ϩ̅ⲛ̅ ⲧⲕⲗⲟⲟⲗⲉ ⲛ̅ⲫⲩ‐ <text:line-break/><text:span text:style-name="T1"> </text:span><text:span text:style-name="T2">(17/14) </text:span> ⲙⲏⲛ· ⲛⲉⲩϩ̅ⲣ̅ⲧⲉ ⲅⲁⲣ ⲡⲉ ⲡⲉϥ‐ <text:line-break/><text:span text:style-name="T1"> </text:span><text:span text:style-name="T2">(17/15) </text:span> ⲕⲱϩ̅ⲧ̅’̅ ⲉϥϫⲓⲥⲉ ⲙ̅ⲙⲟϥ ⲉⲙⲁϥ <text:line-break/><text:span text:style-name="T1"> </text:span><text:span text:style-name="T2">(17/16) </text:span> ϭⲱϫ̅ⲃ̅· ϣⲓⲛⲁ ⲇⲉ ⲉϥⲛⲁⲟⲩⲱⲛ̅ϩ̅ <text:line-break/><text:span text:style-name="T1"> </text:span><text:span text:style-name="T2">(17/17) </text:span> ⲉⲃⲟⲗ ⲛ̅ϭⲓ ⲡⲁⲙⲉⲅⲉⲑⲟⲥ ⲁⲩⲱ <text:line-break/><text:span text:style-name="T1"> </text:span><text:span text:style-name="T2">(17/18) </text:span> ⲡⲗⲟⲅⲟⲥ· ϩⲟⲙⲟⲓⲱⲥ ⲁⲉⲓⲕⲱ ⲛ̅‐ <text:line-break/><text:span text:style-name="T1"> </text:span><text:span text:style-name="T2">(17/19) </text:span> ⲧⲁⲕⲉϩ̅ⲃ̅ⲥⲱ ϩ̅ⲛ̅ ⲧⲕⲗⲟⲟⲗⲉ ⲙ̅ⲡⲕⲁ‐ <text:line-break/><text:span text:style-name="T1"> </text:span><text:span text:style-name="T2">(17/20) </text:span> ⲣⲱϥ· ⲁⲉⲓⲃⲱⲕ ⲉϩⲟⲩⲛ ⲉⲧⲙⲉⲥⲟ‐ <text:line-break/><text:span text:style-name="T1"> </text:span><text:span text:style-name="T2">(17/21) </text:span> ⲧⲏⲥ ⲁⲉⲓϯ ϩ̅ⲓ̅ⲱⲱⲧ’ ⲙ̅ⲡⲟⲩⲟⲉⲓⲛ <text:line-break/><text:span text:style-name="T1"> </text:span><text:span text:style-name="T2">(17/22) </text:span> ⲉⲧ’ϣⲟⲟⲡ ⲛ̅ϩⲏⲧ̅ⲥ̅ ⲡⲉⲧⲟⲩⲟⲃ̅ϣ̅ <text:line-break/><text:span text:style-name="T1"> </text:span><text:span text:style-name="T2">(17/23) </text:span> ⲉⲣⲟϥ ⲡⲉⲧ’ⲡⲁⲣⲉϫ ⲁⲡⲡ̅ⲛ̅ⲁ̅ ⲛ̅ⲑⲁⲩ‐ <text:line-break/><text:span text:style-name="T1"> </text:span><text:span text:style-name="T2">(17/24) </text:span> ⲙⲁ· ⲁϥⲛⲟⲩϫⲉ ⲅⲁⲣ ⲙ̅ⲡⲃⲁⲣⲟⲥ ⲉ‐ <text:line-break/><text:span text:style-name="T1"> </text:span><text:span text:style-name="T2">(17/25) </text:span> ⲃⲟⲗ ⲙ̅ⲙⲟϥ· ⲛ̅ⲧⲉⲣⲓⲟⲩⲱϣ ⲙ̅‐ <text:line-break/><text:span text:style-name="T1"> </text:span><text:span text:style-name="T2">(17/26) </text:span> ⲡⲉⲗⲁⲁⲩ ⲛ̅ⲑⲛⲏⲧⲟⲛ ⲟⲩⲱⲛ̅ϩ̅ <text:line-break/><text:span text:style-name="T1"> </text:span><text:span text:style-name="T2">(17/27) </text:span> ⲉⲃⲟⲗ ⲛⲁϥ· ⲁⲗⲗⲁ ϩⲉⲛⲁⲧⲙⲟⲩ <text:line-break/><text:span text:style-name="T1"> </text:span><text:span text:style-name="T2">(17/28) </text:span> ⲧⲏⲣⲟⲩ ⲛⲉⲛⲧⲁⲡ̅ⲡ̅ⲛ̅ⲁ̅ ⲭⲁⲣⲓⲍⲉ <text:line-break/><text:span text:style-name="T1"> </text:span><text:span text:style-name="T2">(17/29) </text:span> ⲙ̅ⲙⲟⲟⲩ ⲛⲁϥ· ⲁⲩⲱ ⲡⲉϫⲁϥ ϩ̅ⲙ̅ <text:line-break/><text:span text:style-name="T1"> </text:span><text:span text:style-name="T2">(17/30) </text:span> ⲡⲙⲉⲉⲩⲉ ⲙ̅ⲡⲟⲩⲟⲉⲓⲛ ⲁ̅ⲓ̅ ⲉ̅ⲓⲥ̅ <text:line-break/><text:soft-page-break/><text:span text:style-name="T1"> </text:span><text:span text:style-name="T2">(17/31) </text:span> ⲁ̅ⲓ̅ ⲟ̅ⲩ̅ ⲫⲁ̅ⲣ̅ ⲇⲟ̅ⲩ̅ ⲓ̅ⲁ̅ ⲉ̅ⲓ̅ ⲟ̅ⲩ̅ ϫⲉ <text:line-break/><text:span text:style-name="T1"> </text:span><text:span text:style-name="T2">(17/32) </text:span> ⲁⲉⲓϣⲱⲡⲉ ϩ̅ⲛ̅ ⲟⲩⲛⲟϭ ⲛ̅ⲁⲛⲁ <text:line-break/><text:span text:style-name="T1"> </text:span><text:span text:style-name="T2">(17/33) </text:span> ⲡⲁⲩⲥⲓⲥ· ϫⲉⲕⲁⲁⲥ ⲉϥⲛⲁϯ ⲁ‐ <text:line-break/><text:span text:style-name="T1"> </text:span><text:span text:style-name="T2">(17/34) </text:span> ⲛⲁⲡⲁⲩⲥⲓⲥ ⲙ̅ⲡⲁⲟⲩⲟⲉⲓⲛ ϩ̅ⲛ̅ <text:line-break/><text:span text:style-name="T1"> </text:span><text:span text:style-name="T2">(17/35) </text:span> ⲧⲉϥⲛⲟⲩⲛⲉ ⲛ̅ϥ̅ⲛ̅ⲧ̅ϥ̅ ⲉⲃⲟⲗ ϩ̅ⲛ̅ <text:line-break/><text:span text:style-name="T1"> </text:span><text:span text:style-name="T2">(18/1) </text:span> ⲧⲫⲩⲥⲓⲥ ⲉⲧⲣ̅ⲃⲗⲁⲡⲧⲉⲓ· ⲧⲟⲧ[ⲉ ⲁ]‐ <text:line-break/><text:span text:style-name="T1"> </text:span><text:span text:style-name="T2">(18/2) </text:span> ⲛⲟⲕ ϩ̅ⲙ̅ ⲡⲟⲩⲱϣⲉ ⲙ̅ⲡⲙⲉⲅⲉⲑ̣[ⲟⲥ] <text:line-break/><text:span text:style-name="T1"> </text:span><text:span text:style-name="T2">(18/3) </text:span> ⲁⲉⲓⲕⲁⲁⲕ̅ⲧ̅’̅ ⲁϩⲏⲩ ⲛ̅ⲧⲁϩ̅ⲃ̅ⲥⲱ ⲛ̅ⲟ̣[ⲩ] <text:line-break/><text:span text:style-name="T1"> </text:span><text:span text:style-name="T2">(18/4) </text:span> ⲟⲉⲓⲛ· ⲁⲉⲓϯ ϩ̅ⲓ̅ⲱⲱⲧ’ ⲛ̅ⲕⲉϩ̅ⲃ̅ⲥⲱ <text:line-break/><text:span text:style-name="T1"> </text:span><text:span text:style-name="T2">(18/5) </text:span> ⲛ̅ⲕⲱϩ̅ⲧ̅’̅ ⲉⲙ̅ⲛ̅ⲧⲉⲥ ⲙⲟⲣⲫⲏ· ⲡⲉⲧ‐ <text:line-break/><text:span text:style-name="T1"> </text:span><text:span text:style-name="T2">(18/6) </text:span> ϣⲟⲟⲡ ⲉⲃⲟⲗ ϩ̅ⲙ̅ ⲡⲛⲟⲩⲥ ⲛ̅ⲧⲇⲩ‐ <text:line-break/><text:span text:style-name="T1"> </text:span><text:span text:style-name="T2">(18/7) </text:span> ⲛⲁⲙⲓⲥ· ⲡⲁⲓ̈ ⲛⲉϥⲡⲏϣ ⲁⲩⲱ ⲉⲧ’‐ <text:line-break/><text:span text:style-name="T1"> </text:span><text:span text:style-name="T2">(18/8) </text:span> ⲥ̅ⲃ̅ⲧⲱⲧ’ ⲛⲁⲓ̈ ⲕⲁⲧⲁ ⲡⲁⲟⲩⲱϣ ϩ̅ⲛ̅ <text:line-break/><text:span text:style-name="T1"> </text:span><text:span text:style-name="T2">(18/9) </text:span> ⲧⲙⲉⲥⲟⲧⲏⲥ· ⲛⲉⲣⲉⲧⲙⲉⲥⲟⲧⲏⲥ <text:line-break/><text:span text:style-name="T1"> </text:span><text:span text:style-name="T2">(18/10) </text:span> ⲅⲁⲣ ϩⲱⲃⲉⲥ ⲙ̅ⲙⲟϥ ϩ̅ⲛ̅ⲛ ⲟⲩⲇⲩⲛⲁ <text:line-break/><text:span text:style-name="T1"> </text:span><text:span text:style-name="T2">(18/11) </text:span> ⲙⲓⲥ ⲛ̅ⲕⲁⲕⲉ· ϫⲉⲕⲁⲁⲥ ⲉⲓ̈ⲛⲁⲉ̅ⲓ̅ ⲛ̅‐ <text:line-break/><text:span text:style-name="T1"> </text:span><text:span text:style-name="T2">(18/12) </text:span> ⲧⲁⲧⲁⲁϥ ϩ̅ⲓ̅ⲱⲱⲧ’· ⲁⲉⲓⲃⲱⲕ ⲉⲡⲓⲧ̅ⲛ̅ <text:line-break/><text:span text:style-name="T1"> </text:span><text:span text:style-name="T2">(18/13) </text:span> ⲉⲡⲭⲁⲟⲥ ϫⲉⲕⲁⲁⲥ ⲡⲟⲩⲟⲉⲓⲛ ⲧⲏ‐ <text:line-break/><text:span text:style-name="T1"> </text:span><text:span text:style-name="T2">(18/14) </text:span> ⲣ̅ϥ̅ ⲉⲓ̈ⲛⲁⲛⲁϩⲙⲉϥ ⲉⲣⲟϥ· ⲛ̅ⲟⲩⲉϣ <text:line-break/><text:span text:style-name="T1"> </text:span><text:span text:style-name="T2">(18/15) </text:span> ⲛ̅ⲧⲇⲩⲛⲁⲙⲓⲥ ⲅⲁⲣ ⲛ̅ⲕⲁⲕⲉ ⲙ̅ⲡⲓϣϯ <text:line-break/><text:span text:style-name="T1"> </text:span><text:span text:style-name="T2">(18/16) </text:span> ⲉϩ̅ⲣ̅ⲛ̅ ⲧⲫⲩⲥⲓⲥ· ⲛ̅ⲧⲁⲣⲓⲉ̅ⲓ̅ ⲉϩⲟⲩⲛ <text:line-break/><text:span text:style-name="T1"> </text:span><text:span text:style-name="T2">(18/17) </text:span> ⲉⲧ’ⲫⲩⲥⲓⲥ ⲙ̅ⲡⲉⲥⲉ{ⲥ}ϣϥⲓ ⲉϩⲣⲁⲓ̈ <text:line-break/><text:span text:style-name="T1"> </text:span><text:span text:style-name="T2">(18/18) </text:span> ϩⲁ ⲧⲁⲇⲩⲛⲁⲙⲓⲥ· ⲁⲗⲗⲁ ⲁⲉⲓⲙ̅ⲧⲟⲛ <text:line-break/><text:span text:style-name="T1"> </text:span><text:span text:style-name="T2">(18/19) </text:span> ⲙ̅ⲙⲟⲉⲓ ⲉϩⲣⲁⲓ̈ ⲉϫ̅ⲛ̅ ⲡⲉⲥⲃⲁⲗ ⲉⲧ‐ <text:line-break/><text:span text:style-name="T1"> </text:span><text:span text:style-name="T2">(18/20) </text:span> ⲉⲓⲱⲣ̅ⲙ̅· ⲛⲉϥϣⲟⲟⲡ ⲛ̅ⲟⲩⲟⲉⲓⲛ <text:line-break/><text:span text:style-name="T1"> </text:span><text:span text:style-name="T2">(18/21) </text:span> ⲉⲃⲟⲗ ϩ̅ⲙ̅ ⲡ̅ⲛⲁ̅· ⲛⲉⲁⲩⲥ̅ⲃ̅ⲧⲱⲧ̅ϥ̅ <text:line-break/><text:span text:style-name="T1"> </text:span><text:span text:style-name="T2">(18/22) </text:span> ⲅⲁⲣ ⲛⲁⲓ̈ ⲛ̅ϩ̅ⲃ̅ⲥⲱ· ⲁⲩⲱ ⲛ̅ⲁⲛⲁⲡⲁⲩ <text:line-break/><text:span text:style-name="T1"> </text:span><text:span text:style-name="T2">(18/23) </text:span> ⲥⲓⲥ ⲉⲃⲟⲗ ϩ̅ⲙ̅ ⲡ̅ⲛⲁ̅· ⲉⲃⲟⲗ ϩ̅ⲓ̅ⲧⲟⲟⲧ’ <text:line-break/><text:span text:style-name="T1"> </text:span><text:span text:style-name="T2">(18/24) </text:span> ⲁϥⲟⲩⲱⲛ ⲛ̅ⲛⲉϥⲃⲁⲗ ⲉⲡⲓⲧ̅ⲛ̅ ⲁⲉ‐ <text:line-break/><text:span text:style-name="T1"> </text:span><text:span text:style-name="T2">(18/25) </text:span> ⲙ̅ⲛ̅ⲧⲉ· ⲁϥⲣ̅ⲭⲁⲣⲓⲍⲉ ⲛ̅ⲧⲫⲩⲥⲓⲥ <text:line-break/><text:span text:style-name="T1"> </text:span><text:span text:style-name="T2">(18/26) </text:span> ⲙ̅ⲡⲉϥϩⲣⲟⲟⲩ ⲡⲣⲟⲥ ⲟⲩⲟⲉⲓϣ· <text:line-break/><text:span text:style-name="T1"> </text:span><text:span text:style-name="T2">(18/27) </text:span> ⲧⲁϩ̅ⲃ̅ⲥⲱ ⲇⲉ ⲛ̅ⲕⲱϩ̅ⲧ’̅ ⲕⲁⲧⲁ ⲡⲟⲩ‐ <text:line-break/><text:span text:style-name="T1"> </text:span><text:span text:style-name="T2">(18/28) </text:span> ⲱϣ ⲙ̅ⲡⲙⲉⲅⲉⲑⲟⲥ· ⲁϥⲃⲱⲕ <text:line-break/><text:span text:style-name="T1"> </text:span><text:span text:style-name="T2">(18/29) </text:span> ⲉϩⲣⲁⲓ̈ ⲉⲡⲉⲧ’ϫⲟⲟⲣ· ⲁⲩⲱ ⲁⲡⲙⲉ <text:line-break/><text:span text:style-name="T1"> </text:span><text:span text:style-name="T2">(18/30) </text:span> ⲣⲟⲥ ⲛ̅ⲁⲕⲁⲑⲁⲣⲧⲟⲛ ⲛ̅ⲧⲉ ⲧⲫⲩ‐ <text:line-break/><text:span text:style-name="T1"> </text:span><text:span text:style-name="T2">(18/31) </text:span> ⲥⲓⲥ· ⲡⲁⲓ̈ ⲛⲉⲣⲉ〈ⲧ〉ⲇⲩⲛⲁⲙⲓⲥ ⲛ̅ⲕⲁ‐ <text:line-break/><text:span text:style-name="T1"> </text:span><text:span text:style-name="T2">(18/32) </text:span> ⲕⲉ ϩⲱⲃ̅ⲥ̅ ⲙ̅ⲙⲟϥ· ⲁⲩⲱ ⲁⲧⲁϩ̅ⲃ̅ <text:line-break/><text:span text:style-name="T1"> </text:span><text:span text:style-name="T2">(18/33) </text:span> ⲥⲱ ϩ̅ⲓ̅ⲧⲉ ⲛ̅ⲧⲫⲩⲥⲓⲥ ϩ̅ⲙ̅ ⲡⲉⲥ‐ <text:line-break/><text:span text:style-name="T1"> </text:span><text:span text:style-name="T2">(18/34) </text:span> ϩⲱⲃⲉⲥ· ⲁⲩⲱ ⲁϥϭ̅ⲙ̅ϭⲟⲙ ⲛ̅ϭⲓ ⲡⲉⲥ‐ <text:line-break/><text:span text:style-name="T1"> </text:span><text:span text:style-name="T2">(18/35) </text:span> ⲑⲏⲗⲩⲕⲟⲛ ⲛ̅ⲁⲕⲁⲑⲁⲣⲧⲟⲛ· ⲁⲩⲱ <text:line-break/><text:span text:style-name="T1"> </text:span><text:span text:style-name="T2">(18/36) </text:span> ⲁⲥⲉ̅ⲓ̅ ⲁϩⲣⲁⲓ̈ ⲛ̅ϭⲓ ⲧⲙⲏⲧⲣⲁ ⲉⲥⲃⲟ‐ <text:line-break/><text:span text:style-name="T1"> </text:span><text:span text:style-name="T2">(19/1) </text:span> [ⲗ]ⲉⲕ ⲁⲥⲧⲣⲉⲡⲛⲟⲩⲥ ϣⲟⲟⲩⲉ <text:line-break/><text:span text:style-name="T1"> </text:span><text:span text:style-name="T2">(19/2) </text:span> ⲛ̅ⲑⲉ ⲛ̅ⲟⲩⲉⲓⲛⲉ ⲛ̅ⲧ̅ⲃ̅ⲧ̅’̅· ⲉⲩⲛ̅ⲧⲁϥ <text:line-break/><text:span text:style-name="T1"> </text:span><text:span text:style-name="T2">(19/3) </text:span> ⲙ̅ⲙⲁⲩ ⲛ̅ⲟⲩⲧ̅ⲗ̅ϯⲗⲉ ⲛ̅ⲕⲱϩ̅ⲧ’̅ ⲙ̅ⲛ̅‐ <text:line-break/><text:span text:style-name="T1"> </text:span><text:span text:style-name="T2">(19/4) </text:span> ⲛ ⲟⲩϭⲁⲙ ⲛ̅ⲕⲱϩ̅ⲧ̅’̅· ⲛ̅ⲧⲁⲣⲉⲧⲫⲩ‐ <text:line-break/><text:span text:style-name="T1"> </text:span><text:span text:style-name="T2">(19/5) </text:span> ⲥⲓⲥ ⲇⲉ ⲛⲟⲩϫⲉ ⲙ̅ⲡⲛⲟⲩⲥ ⲉⲃⲟⲗ <text:line-break/><text:span text:style-name="T1"> </text:span><text:span text:style-name="T2">(19/6) </text:span> ⲙ̅ⲙⲟⲥ· ⲁⲥϣⲧⲟⲣⲧ̅ⲣ̅ ⲁⲩⲱ ⲁⲥ‐ <text:line-break/><text:soft-page-break/><text:span text:style-name="T1"> </text:span><text:span text:style-name="T2">(19/7) </text:span> ⲣⲓⲙⲉ· ⲛ̅ⲧⲁⲣⲉⲥϯ ⲧⲕⲁⲥ ⲁⲩⲱ ϩ̅ⲛ̅ <text:line-break/><text:span text:style-name="T1"> </text:span><text:span text:style-name="T2">(19/8) </text:span> ⲛⲉⲥⲣ̅ⲙ̅ⲉⲓⲟⲟⲩⲉ ⲁⲥⲛⲟⲩϫⲉ ⲛ̅‐ <text:line-break/><text:span text:style-name="T1"> </text:span><text:span text:style-name="T2">(19/9) </text:span> ⲧⲇⲩⲛⲁⲙⲓⲥ ⲙ̅ⲡ̅ⲡ̅ⲛⲁ̅ ⲉⲃⲟⲗ ⲙ̅ⲙⲟⲥ <text:line-break/><text:span text:style-name="T1"> </text:span><text:span text:style-name="T2">(19/10) </text:span> ⲁⲥϭⲱ ⲛ̅ⲧⲁϩⲉ· ⲛ̅ⲧⲁⲓ̈ϯ ϩ̅ⲓ̅ⲱⲱⲧ’ <text:line-break/><text:span text:style-name="T1"> </text:span><text:span text:style-name="T2">(19/11) </text:span> ⲙ̅ⲡⲟⲩⲟⲉⲓⲛ ⲙ̅ⲡ̅ⲡ̅ⲛⲁ̅· ⲁⲩⲱ ⲁⲉⲓ <text:line-break/><text:span text:style-name="T1"> </text:span><text:span text:style-name="T2">(19/12) </text:span> ⲙ̅ⲧⲟⲛ ⲙ̅ⲙⲟⲓ̈ ⲙ̅ⲛ̅ ⲧⲁϩ̅ⲃ̅ⲥⲱ ⲉϫ̅ⲙ̅ <text:line-break/><text:span text:style-name="T1"> </text:span><text:span text:style-name="T2">(19/13) </text:span> ⲡⲛⲁⲩ ⲙ̅ⲡ̅ⲧ̅ⲃⲧ’̅· ⲁⲩⲱ ϣⲓⲛⲁ ⲉⲩ‐ <text:line-break/><text:span text:style-name="T1"> </text:span><text:span text:style-name="T2">(19/14) </text:span> ⲛⲁⲣ̅ⲕⲁⲧⲁⲅⲓⲛⲱⲥⲕⲉ ⲛ̅ⲛ̅ϩⲃⲏⲩⲉ <text:line-break/><text:span text:style-name="T1"> </text:span><text:span text:style-name="T2">(19/15) </text:span> ⲛ̅ⲧⲫⲩⲥⲓⲥ ϫⲉ ⲟⲩⲃ̅ⲗ̅ⲗⲏ ⲧⲉ· ⲁϩⲁϩ <text:line-break/><text:span text:style-name="T1"> </text:span><text:span text:style-name="T2">(19/16) </text:span> ⲙ̅ⲙⲟⲣⲫⲏ ⲛ̅ⲑⲏⲣⲓⲟⲛ ⲉⲓ ⲉⲃⲟⲗ ⲛ̅‐ <text:line-break/><text:span text:style-name="T1"> </text:span><text:span text:style-name="T2">(19/17) </text:span> ϩⲏⲧ̅ⲥ̅· ⲕⲁⲧⲁ ⲧⲏⲡⲉ ⲛ̅ⲛ̅ⲧⲏⲟⲩ <text:line-break/><text:span text:style-name="T1"> </text:span><text:span text:style-name="T2">(19/18) </text:span> ⲉⲧ’ϩⲏⲗ· ⲁⲩϣⲱⲡⲉ ⲧⲏⲣⲟⲩ ϩ̅ⲛ̅ <text:line-break/><text:span text:style-name="T1"> </text:span><text:span text:style-name="T2">(19/19) </text:span> ⲉⲙ̅ⲛ̅ⲧⲉ· ⲉⲩϣⲓⲛⲉ ⲛ̅ⲥⲁ ⲡⲟⲩⲟ‐ <text:line-break/><text:span text:style-name="T1"> </text:span><text:span text:style-name="T2">(19/20) </text:span> ⲉⲓⲛ ⲙ̅ⲡⲛⲟⲩⲥ ⲉⲧ’ϫⲓ ⲉⲓⲛⲉ· ⲙ̅ⲡⲟⲩ‐ <text:line-break/><text:span text:style-name="T1"> </text:span><text:span text:style-name="T2">(19/21) </text:span> ϣϭ̅ⲙ̅ϭⲁⲙ ⲛ̅ⲁϩⲉ ⲉⲣⲁⲧⲟⲩ ⲟⲩⲃⲏϥ· <text:line-break/><text:span text:style-name="T1"> </text:span><text:span text:style-name="T2">(19/22) </text:span> ⲁⲉⲓⲣⲁϣⲉ ⲉϫ̅ⲛ̅ ⲧⲉⲩⲙ̅ⲛⲧ’̅ⲁⲧⲥⲟ‐ <text:line-break/><text:span text:style-name="T1"> </text:span><text:span text:style-name="T2">(19/23) </text:span> ⲟⲩⲛ· ⲁⲩϭⲓⲛⲉ ⲙ̅ⲙⲟⲉⲓ ⲁⲛⲟⲕ <text:line-break/><text:span text:style-name="T1"> </text:span><text:span text:style-name="T2">(19/24) </text:span> ⲡϣⲏⲣⲉ ⲙ̅ⲡⲙⲉⲅⲉⲑⲟⲥ ⲙ̅ⲡⲉⲙ‐ <text:line-break/><text:span text:style-name="T1"> </text:span><text:span text:style-name="T2">(19/25) </text:span> ⲧⲟ ⲉⲃⲟⲗ ⲛ̅ⲧⲙⲏⲧⲣⲁ ⲉⲧⲉ ⲟⲩⲛ̅‐ <text:line-break/><text:span text:style-name="T1"> </text:span><text:span text:style-name="T2">(19/26) </text:span> ⲧⲉⲥ ϩⲁϩ ⲙ̅ⲙⲟⲣⲫⲏ· ⲁⲉⲓϯ ϩ̅ⲓ̅ⲱ‐ <text:line-break/><text:span text:style-name="T1"> </text:span><text:span text:style-name="T2">(19/27) </text:span> ⲱⲧ’ ⲙ̅ⲡⲑⲏⲣⲓⲟⲛ· ⲁⲩⲱ ⲁⲉⲓⲣ̅ⲁⲓ <text:line-break/><text:span text:style-name="T1"> </text:span><text:span text:style-name="T2">(19/28) </text:span> ⲧⲉⲓ ⲙ̅ⲙⲟⲥ ⲛ̅ⲟⲩⲛⲟϭ ⲛ̅ⲁⲓⲧⲏ <text:line-break/><text:span text:style-name="T1"> </text:span><text:span text:style-name="T2">(19/29) </text:span> ⲙⲁ ⲉⲧⲣⲉⲟⲩⲡⲉ ⲙ̅ⲛ̅ ⲟⲩⲕⲁϩ <text:line-break/><text:span text:style-name="T1"> </text:span><text:span text:style-name="T2">(19/30) </text:span> ϣⲱⲡⲉ· ϫⲉⲕⲁⲁⲥ ⲉϥⲛⲁϫⲓⲥⲉ <text:line-break/><text:span text:style-name="T1"> </text:span><text:span text:style-name="T2">(19/31) </text:span> ⲛ̅ϭⲓ ⲡⲟⲩⲟⲉⲓⲛ ⲧⲏⲣ̅ϥ̅· ⲛ̅ⲕⲉⲣⲏ‐ <text:line-break/><text:span text:style-name="T1"> </text:span><text:span text:style-name="T2">(19/32) </text:span> ⲧⲉ ⲅⲁⲣ ⲛⲉⲥⲛⲁϣⲛⲟⲩϩ̅ⲙ̅ ⲁⲛ ⲛ̅‐ <text:line-break/><text:span text:style-name="T1"> </text:span><text:span text:style-name="T2">(19/33) </text:span> ϭⲓ ⲧⲇⲩⲛⲁⲙⲓⲥ ⲙ̅ⲡ̅ⲛ̅ⲁ̅ ⲁⲧⲙ̅ⲣ̅ⲣⲉ· <text:line-break/><text:span text:style-name="T1"> </text:span><text:span text:style-name="T2">(19/34) </text:span> ⲉⲓⲙⲏⲧⲓ ϫⲉ ⲁⲉⲓⲟⲩⲱⲛ̅ϩ̅ ⲉⲃⲟⲗ <text:line-break/><text:span text:style-name="T1"> </text:span><text:span text:style-name="T2">(19/35) </text:span> ⲛⲁⲥ ⲛ̅ⲟⲩⲉⲓⲛⲉ ⲛ̅ⲑⲏⲣⲓⲟⲛ· <text:line-break/><text:span text:style-name="T1"> </text:span><text:span text:style-name="T2">(19/36) </text:span> ⲇⲓⲁⲧⲟⲩⲧⲟ ⲁⲥⲣ̅ⲭⲁⲣⲓⲍⲉ ⲛⲁⲓ̈ <text:line-break/><text:span text:style-name="T1"> </text:span><text:span text:style-name="T2">(20/1) </text:span> ϩⲱⲥ ⲉⲁⲛⲟⲕ ⲡⲉ ⲡⲉⲥϣⲏⲣⲉ̣ <text:line-break/><text:span text:style-name="T1"> </text:span><text:span text:style-name="T2">(20/2) </text:span> ⲁⲩⲱ ⲉⲧⲃⲉ ⲡⲁⲁⲓⲧⲏⲙⲁ ⲁⲥϫⲓⲥⲉ̣ <text:line-break/><text:span text:style-name="T1"> </text:span><text:span text:style-name="T2">(20/3) </text:span> ⲛ̅ϭⲓ ⲧⲫⲩⲥⲓⲥ ⲉⲩⲛ̅ⲧⲁⲥ ⲉⲃⲟⲗ ϩ̅ⲛ̅ <text:line-break/><text:span text:style-name="T1"> </text:span><text:span text:style-name="T2">(20/4) </text:span> ⲧⲇⲩⲛⲁⲙⲓⲥ ⲙ̅ⲡ̅ⲡ̅ⲛⲁ̅ ⲙ̅ⲛ̅ ⲡⲕⲁⲕⲉ <text:line-break/><text:span text:style-name="T1"> </text:span><text:span text:style-name="T2">(20/5) </text:span> ⲙ̅ⲛ̅ ⲡⲕⲱϩ̅ⲧ’̅· ⲁⲥⲕⲁⲁⲕ̅ⲥ̅ ⲅⲁⲣ ⲁϩⲏ‐ <text:line-break/><text:span text:style-name="T1"> </text:span><text:span text:style-name="T2">(20/6) </text:span> ⲟⲩ ⲛ̅ⲛⲉⲥⲙⲟⲣⲫⲏ ⲛ̅ⲧⲁⲣⲉⲥⲛⲁⲩ‐ <text:line-break/><text:span text:style-name="T1"> </text:span><text:span text:style-name="T2">(20/7) </text:span> ϩ̅ⲥ̅ ⲁⲥⲛⲓϥⲉ ⲉϫ̅ⲙ̅ ⲡⲙⲟⲟⲩ· ⲁⲩ‐ <text:line-break/><text:span text:style-name="T1"> </text:span><text:span text:style-name="T2">(20/8) </text:span> ⲥⲱⲛ̅ⲧ̅’̅ ⲛ̅ⲧⲡⲉ· ⲁⲩⲱ ⲉⲃⲟⲗ ϩ̅ⲛ̅ <text:line-break/><text:span text:style-name="T1"> </text:span><text:span text:style-name="T2">(20/9) </text:span> ⲑⲃⲏⲧⲉ ⲛ̅ⲧⲡⲉ ⲁϥϣⲱⲡⲉ ⲛ̅ϭⲓ <text:line-break/><text:span text:style-name="T1"> </text:span><text:span text:style-name="T2">(20/10) </text:span> ⲡⲕⲁϩ· ⲁⲩⲱ ⲛ̅ⲧⲁⲣⲓⲟⲩⲱϣ ⲁϥ‐ <text:line-break/><text:span text:style-name="T1"> </text:span><text:span text:style-name="T2">(20/11) </text:span> ϫⲡⲟ ⲛ̅ⲛ̅ⲕⲁ ⲛⲓⲙ ⲛ̅ⲟⲩⲱⲙ ⲕⲁ‐ <text:line-break/><text:span text:style-name="T1"> </text:span><text:span text:style-name="T2">(20/12) </text:span> ⲧⲁ ⲧⲏⲡⲉ ⲛ̅ⲛ̅ⲑⲏⲣⲓⲟⲛ· ⲁⲩⲱ ⲁϥ‐ <text:line-break/><text:span text:style-name="T1"> </text:span><text:span text:style-name="T2">(20/13) </text:span> ⲉⲓⲛⲉ ⲛ̅ⲛⲟⲩⲉⲓⲱⲧⲉ ⲉⲃⲟⲗ ϩ̅ⲛ̅ <text:line-break/><text:span text:style-name="T1"> </text:span><text:span text:style-name="T2">(20/14) </text:span> ⲛ̅ⲧⲏⲟⲩ ⲉⲧⲃⲉ ⲧⲏⲛⲉ ⲙ̅ⲛ̅ ⲛⲉ‐ <text:line-break/><text:span text:style-name="T1"> </text:span><text:span text:style-name="T2">(20/15) </text:span> ⲧⲟⲩⲛⲁϫⲡⲟⲟⲩ ⲙ̅ⲡⲙⲉϩⲥⲉⲡ <text:line-break/><text:span text:style-name="T1"> </text:span><text:span text:style-name="T2">(20/16) </text:span> ⲥⲛⲁⲩ ϩ̅ⲓ̅ϫ̅ⲙ̅ ⲡⲕⲁϩ· ⲛⲉⲣⲉ <text:line-break/><text:span text:style-name="T1"> </text:span><text:span text:style-name="T2">(20/17) </text:span> ⲡⲕⲁϩ ⲅⲁⲣ ⲟⲩⲛ̅ⲧⲁϥ ⲙ̅ⲙⲁⲩ ⲛ̅‐ <text:line-break/><text:soft-page-break/><text:span text:style-name="T1"> </text:span><text:span text:style-name="T2">(20/18) </text:span> ⲟⲩⲇⲩⲛⲁⲙⲓⲥ ⲛ̅ⲕⲱϩ̅ⲧ̅’̅ ⲉϥϣⲧ̅ⲣ̅ <text:line-break/><text:span text:style-name="T1"> </text:span><text:span text:style-name="T2">(20/19) </text:span> ⲧⲁⲣⲉⲧ’· ⲇⲓⲁⲧⲟⲩⲧⲟ ⲁϥϫⲡⲟ ⲛ̅‐ <text:line-break/><text:span text:style-name="T1"> </text:span><text:span text:style-name="T2">(20/20) </text:span> ⲥⲡⲉⲣⲙⲁ ⲛⲓⲙ· ⲁⲩⲱ ⲛ̅ⲧⲁⲣⲟⲩ <text:line-break/><text:span text:style-name="T1"> </text:span><text:span text:style-name="T2">(20/21) </text:span> ⲥⲱⲛ̅ⲧ̅’̅ ⲛ̅ⲧⲡⲉ ⲙ̅ⲛ̅ ⲡⲕⲁϩ ⲁⲥϫⲓⲥⲉ <text:line-break/><text:span text:style-name="T1"> </text:span><text:span text:style-name="T2">(20/22) </text:span> ⲛ̅ϭⲓ ⲧⲁϩ̅ⲃ̅ⲥⲱ ⲛ̅ⲕⲱϩ̅ⲧ’̅ ϩ̅ⲛ̅ ⲧⲙⲏ‐ <text:line-break/><text:span text:style-name="T1"> </text:span><text:span text:style-name="T2">(20/23) </text:span> ⲧⲉ ⲛ̅ⲧⲕⲗⲟⲟⲗⲉ ⲛ̅ⲧⲫⲩⲥⲓⲥ· ⲁⲥⲣ̅‐ <text:line-break/><text:span text:style-name="T1"> </text:span><text:span text:style-name="T2">(20/24) </text:span> ⲟⲩⲟⲉⲓⲛ ⲉϫ̅ⲛ̅ ⲧⲕⲧⲓⲥⲓⲥ ⲧⲏⲣ̅ⲥ̅· <text:line-break/><text:span text:style-name="T1"> </text:span><text:span text:style-name="T2">(20/25) </text:span> ϣⲁⲛⲧⲉⲧⲫⲩⲥⲓⲥ ϣⲱⲡⲉ ⲉⲥ‐ <text:line-break/><text:span text:style-name="T1"> </text:span><text:span text:style-name="T2">(20/26) </text:span> ϣⲟⲩⲉⲓⲧ’· ⲡⲕⲁⲕⲉ ⲉⲧ’ϣⲟⲟⲡ <text:line-break/><text:span text:style-name="T1"> </text:span><text:span text:style-name="T2">(20/27) </text:span> ⲛⲁϥ ⲛ̅ϩ̅ⲃ̅ⲥⲱ ⲁⲩⲛⲟϫ̅ϥ̅ ⲁⲛⲙⲟⲩ <text:line-break/><text:span text:style-name="T1"> </text:span><text:span text:style-name="T2">(20/28) </text:span> ⲉⲓⲟⲟⲩⲉ ⲉⲧⲣ̅ⲃⲗⲁⲡⲧⲉⲓ· ⲁⲩⲧ̅ⲃ̅ⲃⲟ <text:line-break/><text:span text:style-name="T1"> </text:span><text:span text:style-name="T2">(20/29) </text:span> ⲛ̅ⲧⲙⲉⲥⲟⲧⲏⲥ ⲉⲡⲕⲁⲕⲉ· ⲛⲉⲥⲣ̅ <text:line-break/><text:span text:style-name="T1"> </text:span><text:span text:style-name="T2">(20/30) </text:span> ⲗⲩⲡⲏ ⲇⲉ ⲛ̅ϭⲓ ⲧⲙⲏⲧⲣⲁ ⲉⲧⲃⲉ <text:line-break/><text:span text:style-name="T1"> </text:span><text:span text:style-name="T2">(20/31) </text:span> ⲡⲉⲣϣⲱⲡⲉ· ⲁⲥⲣ̅ⲑⲉⲱⲣⲉⲓ ϩ̅ⲛ̅ <text:line-break/><text:span text:style-name="T1"> </text:span><text:span text:style-name="T2">(20/32) </text:span> ⲛⲉⲥⲙⲉⲣⲟⲥ ⲙ̅ⲡⲉⲧⲉ ⲛⲉϥⲟ ⲙ̅‐ <text:line-break/><text:span text:style-name="T1"> </text:span><text:span text:style-name="T2">(20/33) </text:span> ⲙⲟⲟⲩ ⲛ̅ⲑⲉ ⲛ̅ⲛⲓⲁⲗ· ⲛ̅ⲧⲁⲣⲉⲥⲣ̅ <text:line-break/><text:span text:style-name="T1"> </text:span><text:span text:style-name="T2">(20/34) </text:span> ⲑⲉⲱⲣⲉⲓ ⲁⲥⲣ̅ ⲑⲁⲩⲙⲁ ϫⲉ ⲛ̅ⲧⲁϥ‐ <text:line-break/><text:span text:style-name="T1"> </text:span><text:span text:style-name="T2">(20/35) </text:span> ϣⲱⲡⲉ ⲛ̅ⲁϣ ⲛ̅ϩⲉ· ⲁⲥϭⲱ ϭⲉ <text:line-break/><text:span text:style-name="T1"> </text:span><text:span text:style-name="T2">(20/36) </text:span> ⲉⲥⲟ ⲛ̅ⲭⲏⲣⲁ· ⲛ̅ⲧⲟϥ ϩⲱⲱϥ ⲁϥ‐ <text:line-break/><text:span text:style-name="T1"> </text:span><text:span text:style-name="T2">(21/1) </text:span> [ⲣ̅] ⲑ̣ⲁⲩⲙⲁ· ⲛⲉϥϣⲟⲟⲡ ⲁⲛ ⲛ̅ϩⲏⲧ̅ⲥ̅· <text:line-break/><text:span text:style-name="T1"> </text:span><text:span text:style-name="T2">(21/2) </text:span> ⲁⲕⲙⲏⲛ ⲅⲁⲣ ⲛⲉⲛ̅ⲙⲟⲣⲫⲏ ⲛⲉⲩ <text:line-break/><text:span text:style-name="T1"> </text:span><text:span text:style-name="T2">(21/3) </text:span> ⲛ̅ⲧⲁⲩ ⲙ̅ⲙⲁⲩ ⲛ̅ⲛⲟⲩⲇⲩⲛⲁⲙⲓⲥ <text:line-break/><text:span text:style-name="T1"> </text:span><text:span text:style-name="T2">(21/4) </text:span> ⲛ̅ⲕⲱϩ̅ⲧ̅’̅ ϩ̅ⲓ̅ ⲟⲩⲟⲉⲓⲛ· ⲁⲥⲣ̅ϩⲩⲡⲟ <text:line-break/><text:span text:style-name="T1"> </text:span><text:span text:style-name="T2">(21/5) </text:span> ⲙⲓⲛⲉ ⲉⲧⲣⲉⲥϣⲱⲡⲉ ϩ̅ⲛ̅ ⲧⲫⲩⲥⲓⲥ <text:line-break/><text:span text:style-name="T1"> </text:span><text:span text:style-name="T2">(21/6) </text:span> ϣⲁⲛⲧⲟⲩϥⲓ ⲛ̅ⲇⲩⲛⲁⲙⲓⲥ ⲧⲏⲣⲟⲩ <text:line-break/><text:span text:style-name="T1"> </text:span><text:span text:style-name="T2">(21/7) </text:span> ⲛ̅ⲧⲟⲟⲧ̅ⲥ̅· ⲕⲁⲧⲁ ⲑⲉ ⲅⲁⲣ ⲛ̅ⲧⲁⲩ‐ <text:line-break/><text:span text:style-name="T1"> </text:span><text:span text:style-name="T2">(21/8) </text:span> ϫⲱⲕ ⲉⲃⲟⲗ ⲙ̅ⲡⲟⲩⲟⲉⲓⲛ ⲙ̅ⲡ̅ⲡ̅ⲛⲁ̅ <text:line-break/><text:span text:style-name="T1"> </text:span><text:span text:style-name="T2">(21/9) </text:span> ϩ̅ⲛ̅ ϣⲟⲙⲧⲉ ⲛ̅ⲕⲗⲟⲟⲗⲉ· ⲁⲛⲁⲅⲕⲏ <text:line-break/><text:span text:style-name="T1"> </text:span><text:span text:style-name="T2">(21/10) </text:span> ⲥⲛⲁϫⲱⲕ ⲉⲃⲟⲗ ⲛ̅ϭⲓ ⲧⲕⲉⲇⲩⲛⲁⲙⲓⲥ <text:line-break/><text:span text:style-name="T1"> </text:span><text:span text:style-name="T2">(21/11) </text:span> ⲉⲧ’ϩ̅ⲛ̅ ⲉⲙ̅ⲛ̅ⲧⲉ ⲕⲁⲧⲁ ⲡⲭⲣⲟⲛⲟⲥ <text:line-break/><text:span text:style-name="T1"> </text:span><text:span text:style-name="T2">(21/12) </text:span> ⲉⲧ’ⲕⲏ ⲉϩⲣⲁⲓ̈· ⲁⲛⲟⲕ ⲅⲁⲣ ⲉⲧⲃⲉ ⲧⲭⲁ‐ <text:line-break/><text:span text:style-name="T1"> </text:span><text:span text:style-name="T2">(21/13) </text:span> ⲣⲓⲥ ⲙ̅ⲡⲙⲉⲅⲉⲑⲟⲥ· ⲁⲉⲓⲡⲓⲣⲉ ⲛⲁⲥ <text:line-break/><text:span text:style-name="T1"> </text:span><text:span text:style-name="T2">(21/14) </text:span> ⲉⲃⲟⲗ ϩ̅ⲙ̅ ⲡⲙⲟⲟⲩ ⲙ̅ⲡⲙⲉϩⲥⲉⲡ <text:line-break/><text:span text:style-name="T1"> </text:span><text:span text:style-name="T2">(21/15) </text:span> ⲥⲛⲁⲩ· ⲛⲉⲡⲁϩⲟ ⲅⲁⲣ ⲡⲉ ⲧⲥⲁⲛⲏⲩ <text:line-break/><text:span text:style-name="T1"> </text:span><text:span text:style-name="T2">(21/16) </text:span> ⲛ̅ⲙ̅ⲙⲁⲥ· ⲛⲉⲡⲉⲥϩⲟ ϩⲱⲱⲥ ⲣⲟ‐ <text:line-break/><text:span text:style-name="T1"> </text:span><text:span text:style-name="T2">(21/17) </text:span> ⲟⲩⲧ’· ⲁⲩⲱ ⲡⲉϫⲁⲓ̈ ⲛⲁⲥ ϫⲉ ⲙⲁ‐ <text:line-break/><text:span text:style-name="T1"> </text:span><text:span text:style-name="T2">(21/18) </text:span> ⲣⲉϥϣⲱⲡⲉ ⲉⲃⲟⲗ ⲛ̅ϩⲏⲧⲉ ⲛ̅ϭⲓ ⲟⲩ‐ <text:line-break/><text:span text:style-name="T1"> </text:span><text:span text:style-name="T2">(21/19) </text:span> ⲥⲡⲉⲣⲙⲁ ⲙ̅ⲛ̅ⲛ ⲟⲩⲇⲩⲛⲁⲙⲓⲥ ϩ̅ⲓ̅‐ <text:line-break/><text:span text:style-name="T1"> </text:span><text:span text:style-name="T2">(21/20) </text:span> ϫ̅ⲙ̅ ⲡⲕⲁϩ· ⲛ̅ⲧⲟⲥ ⲇⲉ ⲁⲥⲣ̅ⲡⲓⲑⲉⲥ <text:line-break/><text:span text:style-name="T1"> </text:span><text:span text:style-name="T2">(21/21) </text:span> ⲑⲁⲓ ⲛ̅ⲥⲁ ⲡⲟⲩⲱϣ ⲙ̅ⲡ̅ⲡ̅ⲛⲁ̅ ϣⲓ‐ <text:line-break/><text:span text:style-name="T1"> </text:span><text:span text:style-name="T2">(21/22) </text:span> ⲛⲁ ⲉⲥⲛⲁⲟⲩⲱⲥ̅ϥ̅· ⲛ̅ⲧⲁⲣⲟⲩⲕⲟ‐ <text:line-break/><text:span text:style-name="T1"> </text:span><text:span text:style-name="T2">(21/23) </text:span> ⲧⲟⲩ ⲇⲉ ⲛ̅ϭⲓ ⲛⲉⲥⲙⲟⲣⲫⲏ· ⲁⲩϩ̅ⲓ̅ <text:line-break/><text:span text:style-name="T1"> </text:span><text:span text:style-name="T2">(21/24) </text:span> ⲙ̅ⲡⲟⲩⲗⲁⲥ ϩ̅ⲓ̅ ⲛⲉⲩⲉⲣⲏⲩ ⲁⲩϩⲱ <text:line-break/><text:span text:style-name="T1"> </text:span><text:span text:style-name="T2">(21/25) </text:span> ⲧ̅ⲣ̅ ⲁⲩϫⲡⲟ ⲛ̅ϩⲉⲛⲧⲏⲩ ⲙ̅ⲛ̅ ϩⲉⲛ‐ <text:line-break/><text:span text:style-name="T1"> </text:span><text:span text:style-name="T2">(21/26) </text:span> ⲇⲁⲓⲙⲱⲛ ⲙ̅ⲛ̅ ⲧⲇⲩⲛⲁⲙⲓⲥ ⲉⲧ’‐ <text:line-break/><text:span text:style-name="T1"> </text:span><text:span text:style-name="T2">(21/27) </text:span> ϣⲟⲟⲡ ⲉⲃⲟⲗ ϩ̅ⲙ̅ ⲡⲕⲱϩ̅ⲧ’̅· ⲙ̅ⲛ̅ <text:line-break/><text:span text:style-name="T1"> </text:span><text:span text:style-name="T2">(21/28) </text:span> ⲡⲕⲁⲕⲉ ⲙ̅ⲛ̅ ⲡ̅ⲛⲁ̅· ⲧⲙⲟⲣⲫⲏ ⲇⲉ <text:line-break/><text:soft-page-break/><text:span text:style-name="T1"> </text:span><text:span text:style-name="T2">(21/29) </text:span> ⲉⲣϭⲱ ⲟⲩⲁⲁⲥ· ⲁⲥⲛⲟⲩϫⲉ ⲙ̅ⲡ̅‐ <text:line-break/><text:span text:style-name="T1"> </text:span><text:span text:style-name="T2">(21/30) </text:span> ⲑⲏⲣⲓⲟⲛ ⲉⲃⲟⲗ ⲙ̅ⲙⲟⲥ· ⲛⲉⲙ̅‐ <text:line-break/><text:span text:style-name="T1"> </text:span><text:span text:style-name="T2">(21/31) </text:span> ⲙ̅ⲛ̅ⲧⲁⲥ ϩⲱⲧ̅ⲣ̅ ⲙ̅ⲙⲁⲩ· ⲁⲗⲗⲁ <text:line-break/><text:span text:style-name="T1"> </text:span><text:span text:style-name="T2">(21/32) </text:span> ⲛ̅ⲧⲟⲥ ⲡⲉⲣϩ̅ⲓ̅ ϩ̅ⲓ̅ⲱⲱⲥ ⲟⲩⲁⲁⲥ· <text:line-break/><text:span text:style-name="T1"> </text:span><text:span text:style-name="T2">(21/33) </text:span> ⲁⲩⲱ ⲁⲥϫⲡⲟ ⲛ̅ⲟⲩⲧⲏⲟⲩ ⲉⲩ‐ <text:line-break/><text:span text:style-name="T1"> </text:span><text:span text:style-name="T2">(21/34) </text:span> ⲛ̅ⲧⲁϥ ⲙ̅ⲙⲁⲩ ⲛ̅ⲛⲟⲩⲇⲩⲛⲁⲙⲓⲥ· <text:line-break/><text:span text:style-name="T1"> </text:span><text:span text:style-name="T2">(21/35) </text:span> ⲉⲃⲟⲗ ϩ̅ⲙ̅ ⲡⲕⲱϩ̅ⲧ’̅ ⲙ̅ⲛ̅ ⲡⲕⲁⲕⲉ <text:line-break/><text:span text:style-name="T1"> </text:span><text:span text:style-name="T2">(21/36) </text:span> ⲙ̅ⲛ̅ ⲡⲉⲡ̅ⲛⲁ̅· ϣⲓⲛⲁ ⲇⲉ ⲛ̅ⲕⲉⲇⲁⲓ‐ <text:line-break/><text:span text:style-name="T1"> </text:span><text:span text:style-name="T2">(22/1) </text:span> ⲙⲱⲛ ⲉⲩⲛⲁϣⲱⲡⲉ ⲛ̅ⲁⲣⲅⲟ̣[ⲥ] <text:line-break/><text:span text:style-name="T1"> </text:span><text:span text:style-name="T2">(22/2) </text:span> ⲉⲧ’ⲇⲩⲛⲁⲙⲓⲥ ⲧⲁⲓ̈ ⲛⲉⲩⲛ̅ⲧⲁⲩⲥ̣ <text:line-break/><text:span text:style-name="T1"> </text:span><text:span text:style-name="T2">(22/3) </text:span> ⲉⲃⲟⲗ ϩ̅ⲛ̅ ⲧⲕⲟⲓⲛⲱⲛⲓⲁ ⲉⲧ’ϫⲁϩ̅ⲙ̅ <text:line-break/><text:span text:style-name="T1"> </text:span><text:span text:style-name="T2">(22/4) </text:span> ⲁⲩⲙⲏⲧⲣⲁ ϣⲱⲡⲉ ⲙ̅ⲛ̅ ⲛ̅ⲧⲏⲟⲩ‐ <text:line-break/><text:span text:style-name="T1"> </text:span><text:span text:style-name="T2">(22/5) </text:span> ϩ̅ⲛ̅ ⲟⲩⲉⲓⲛⲉ ⲙ̅ⲙⲟⲟⲩ· ⲁⲩⲱ ⲁⲩ‐ <text:line-break/><text:span text:style-name="T1"> </text:span><text:span text:style-name="T2">(22/6) </text:span> ⲡⲣⲟⲥⲑⲉⲙⲁ ⲛ̅ⲁⲕⲁⲑⲁⲣⲧⲟⲛ ϣⲱ‐ <text:line-break/><text:span text:style-name="T1"> </text:span><text:span text:style-name="T2">(22/7) </text:span> ⲡⲉ ⲙ̅ⲛ̅ ⲛ̅ⲇⲁⲓⲙⲱⲛ ⲕⲁⲧⲁ ⲡⲧⲩⲡⲟⲥ <text:line-break/><text:span text:style-name="T1"> </text:span><text:span text:style-name="T2">(22/8) </text:span> ⲙ̅ⲡⲕⲁⲕⲉ· ⲁⲩⲱ ⲛ̅ⲑⲉ ⲛ̅ⲧⲁϥϩ̅ⲓ̅ ϩ̅ⲓ̅ <text:line-break/><text:span text:style-name="T1"> </text:span><text:span text:style-name="T2">(22/9) </text:span> ⲧⲙⲏⲧⲣⲁ ϫⲓⲛⲛ̅ϣⲟⲣ̅ⲡ̅· ⲁⲩⲱ ⲛ̅ⲧⲁ‐ <text:line-break/><text:span text:style-name="T1"> </text:span><text:span text:style-name="T2">(22/10) </text:span> ⲣⲉⲙ̅ⲙⲟⲣⲫⲏ ⲛ̅ⲧⲫⲩⲥⲓⲥ ϣⲱⲡⲉ <text:line-break/><text:span text:style-name="T1"> </text:span><text:span text:style-name="T2">(22/11) </text:span> ⲙ̅ⲛ̅ ⲛⲉⲩⲉⲣⲏⲩ· ⲁⲩⲛⲁⲩϩⲟⲩ ⲉⲃⲟⲗ <text:line-break/><text:span text:style-name="T1"> </text:span><text:span text:style-name="T2">(22/12) </text:span> ⲛ̅ⲛⲉⲩⲉⲣⲏⲟⲩ ⲁⲩⲛⲟⲩϫⲉ ⲛ̅ⲧⲇⲩ‐ <text:line-break/><text:span text:style-name="T1"> </text:span><text:span text:style-name="T2">(22/13) </text:span> ⲛⲁⲙⲓⲥ ⲉⲃⲟⲗ ⲉⲩⲣ̅ ⲑⲁⲩⲙⲁ ⲉⲧⲃⲉ <text:line-break/><text:span text:style-name="T1"> </text:span><text:span text:style-name="T2">(22/14) </text:span> ⲡⲕⲣⲟϥ ⲉⲣϣⲱⲧⲉ ⲛⲁⲩ· ⲁⲩⲣ̅ ⲗⲩⲡⲏ <text:line-break/><text:span text:style-name="T1"> </text:span><text:span text:style-name="T2">(22/15) </text:span> ϩ̅ⲛ̅ ⲟⲩⲗⲩⲡⲏ ϣⲁ ⲉⲛⲉϩ· ⲁⲩⲣ̅ⲥⲕⲉ‐ <text:line-break/><text:span text:style-name="T1"> </text:span><text:span text:style-name="T2">(22/16) </text:span> ⲡⲁⲍⲉ ⲙ̅ⲙⲟⲟⲩ ϩ̅ⲛ̅ ⲧⲟⲩⲇⲩⲛⲁⲙⲓⲥ· <text:line-break/><text:span text:style-name="T1"> </text:span><text:span text:style-name="T2">(22/17) </text:span> ⲁⲩⲱ ⲛ̅ⲧⲁⲣⲓϯ ⲛⲁⲩ ϣⲓⲡⲉ· ⲁⲉⲓϫⲓ‐ <text:line-break/><text:span text:style-name="T1"> </text:span><text:span text:style-name="T2">(22/18) </text:span> ⲥⲉ ⲙ̅ⲛ̅ ⲧⲁϩ̅ⲃ̅ⲥⲱ ϩ̅ⲛ̅ ⲧⲇⲩⲛⲁⲙⲓⲥ ⲁⲩⲱ <text:line-break/><text:span text:style-name="T1"> </text:span><text:span text:style-name="T2">(22/19) </text:span> ⲉⲧ’ϫⲟⲥⲉ ⲉⲡⲑⲏⲣⲓⲟⲛ ⲉⲧⲟ ⲛ̅ⲟⲩⲟ‐ <text:line-break/><text:span text:style-name="T1"> </text:span><text:span text:style-name="T2">(22/20) </text:span> ⲉⲓⲛ· ϫⲉⲕⲁⲁⲥ ⲉⲓ̈ⲛⲁⲉⲓⲣⲉ ⲛ̅ⲧⲫⲩ‐ <text:line-break/><text:span text:style-name="T1"> </text:span><text:span text:style-name="T2">(22/21) </text:span> ⲥⲓⲥ ⲛ̅ⲉⲣⲏⲙⲟⲥ· ⲡⲛⲟⲩⲥ ⲉⲣⲟⲩⲱⲛ̅ϩ̅ <text:line-break/><text:span text:style-name="T1"> </text:span><text:span text:style-name="T2">(22/22) </text:span> ⲉⲃⲟⲗ ϩ̅ⲛ̅ ⲧⲫⲩⲥⲓⲥ ⲛ̅ⲕⲁⲕⲉ· ⲡⲁⲓ̈ <text:line-break/><text:span text:style-name="T1"> </text:span><text:span text:style-name="T2">(22/23) </text:span> ⲛⲉϥϣⲟⲟⲡ ⲛ̅ⲃⲁⲗ ⲙ̅ⲫⲏⲧ’ ⲙ̅ⲡⲕⲁ‐ <text:line-break/><text:span text:style-name="T1"> </text:span><text:span text:style-name="T2">(22/24) </text:span> ⲕⲉ· ⲛ̅ⲧⲁⲣⲓⲟⲩⲱϣ ⲁϥⲣ̅ⲣ̅ⲣⲟ ⲉϫ̅ⲛ̅ <text:line-break/><text:span text:style-name="T1"> </text:span><text:span text:style-name="T2">(22/25) </text:span> ⲛ̅ⲧⲏⲩ ⲙ̅ⲛ̅ ⲛ̅ⲇⲁⲓⲙⲱⲛ· ⲁⲩⲱ ⲁⲉⲓ <text:line-break/><text:span text:style-name="T1"> </text:span><text:span text:style-name="T2">(22/26) </text:span> ϯ ⲛⲁϥ ⲛ̅ⲟⲩⲉⲓⲛⲉ ⲛ̅ⲕⲱϩ̅ⲧ̅’̅· ⲟⲩⲟ‐ <text:line-break/><text:span text:style-name="T1"> </text:span><text:span text:style-name="T2">(22/27) </text:span> ⲉⲓⲛ ⲁⲩⲱ ⲟⲩⲥⲱⲧ̅ⲙ̅ ⲙ̅ⲛ̅ ⲟⲩⲙⲉ <text:line-break/><text:span text:style-name="T1"> </text:span><text:span text:style-name="T2">(22/28) </text:span> ⲣⲟⲥ ⲛ̅ⲗⲟⲅⲟⲥ ⲛ̅ⲁⲕⲁⲕⲟⲥ· ⲉⲧⲃⲉ <text:line-break/><text:span text:style-name="T1"> </text:span><text:span text:style-name="T2">(22/29) </text:span> ⲡⲁⲓ̈ ⲁⲩϯ ⲛⲁϥ ⲉⲃⲟⲗ ϩ̅ⲛ̅ ⲧⲙ̅ⲛ̅ⲧⲛⲟϭ <text:line-break/><text:span text:style-name="T1"> </text:span><text:span text:style-name="T2">(22/30) </text:span> ϫⲉⲕⲁⲁⲥ ⲉϥⲛⲁϭ̅ⲙ̅ϭⲁⲙ ϩ̅ⲛ̅ ⲧⲉϥ‐ <text:line-break/><text:span text:style-name="T1"> </text:span><text:span text:style-name="T2">(22/31) </text:span> ⲇⲩⲛⲁⲙⲓⲥ· ⲭⲱⲣⲓⲥ ⲇⲩⲛⲁⲙⲓⲥ· <text:line-break/><text:span text:style-name="T1"> </text:span><text:span text:style-name="T2">(22/32) </text:span> ⲭⲱⲣⲓⲥ ⲡⲟⲩⲟⲉⲓⲛ ⲙ̅ⲡ̅ⲡ̅ⲛⲁ̅· ⲁⲩⲱ <text:line-break/><text:span text:style-name="T1"> </text:span><text:span text:style-name="T2">(22/33) </text:span> ⲕⲟⲓⲛⲱⲛⲓⲁ ⲛ̅ⲕⲁⲕⲉ· ϣⲓⲛⲁ ϩ̅ⲙ̅ <text:line-break/><text:span text:style-name="T1"> </text:span><text:span text:style-name="T2">(22/34) </text:span> ⲡϩⲁⲉ ⲛ̅ⲕⲁⲓⲣⲟⲥ ⲉⲧ̅ⲥ̅ⲛⲁⲧⲁⲕⲟ <text:line-break/><text:span text:style-name="T1"> </text:span><text:span text:style-name="T2">(23/1) </text:span> ⲛ̣̅ϩⲏⲧ̅ϥ̅ ⲛ̅ϭⲓ ⲧⲫⲩⲥⲓⲥ ⲉϥⲛⲁⲙ̅ <text:line-break/><text:span text:style-name="T1"> </text:span><text:span text:style-name="T2">(23/2) </text:span> ⲧ̣ⲟⲛ ⲙ̅ⲙⲟϥ ϩ̅ⲙ̅ ⲡⲧⲟⲡⲟⲥ ⲉⲧⲧⲁ‐ <text:line-break/><text:span text:style-name="T1"> </text:span><text:span text:style-name="T2">(23/3) </text:span> ⲉⲓⲏⲟⲩ· ⲥⲉⲛⲁϭⲓⲛⲉ ⲅⲁⲣ ⲙ̅ⲙⲟϥ <text:line-break/><text:span text:style-name="T1"> </text:span><text:span text:style-name="T2">(23/4) </text:span> ⲉϥⲟ ⲙ̅ⲡⲓⲥⲧⲟⲥ· ⲉⲁϥⲣ̅ⲥⲓⲭⲁⲛⲉ <text:line-break/><text:span text:style-name="T1"> </text:span><text:span text:style-name="T2">(23/5) </text:span> ⲉⲧⲁⲕⲁⲑⲁⲣⲥⲓⲁ ⲛ̅ⲧⲫⲩⲥⲓⲥ ⲙ̅ⲛ̅ <text:line-break/><text:soft-page-break/><text:span text:style-name="T1"> </text:span><text:span text:style-name="T2">(23/6) </text:span> ⲡⲕⲁⲕⲉ· ⲧⲇⲩⲛⲁⲙⲓⲥ ⲉⲧ’ϫⲟⲟⲣ <text:line-break/><text:span text:style-name="T1"> </text:span><text:span text:style-name="T2">(23/7) </text:span> ⲙ̅ⲡⲛⲟⲩⲥ ⲁⲥϣⲱⲡⲉ ⲉⲃⲟⲗ ϩ̅ⲙ̅ <text:line-break/><text:span text:style-name="T1"> </text:span><text:span text:style-name="T2">(23/8) </text:span> ⲡⲛⲟⲩⲥ ⲙ̅ⲛ̅ ⲡ̅ⲛⲁ̅ ⲛ̅ⲁⲅⲉⲛⲛⲏⲧⲟⲛ· <text:line-break/><text:span text:style-name="T1"> </text:span><text:span text:style-name="T2">(23/9) </text:span> ⲛ̅ⲧⲏⲟⲩ ⲇⲉ ⲉⲧ’ϣⲟⲟⲡ ⲛ̅ⲇⲁⲓⲙⲱⲛ <text:line-break/><text:span text:style-name="T1"> </text:span><text:span text:style-name="T2">(23/10) </text:span> ⲉⲃⲟⲗ ϩ̅ⲛ̅ ⲟⲩⲙⲟⲟⲩ· ⲙ̅ⲛ̅ ⲟⲩⲕⲱϩ̅ⲧ’̅ <text:line-break/><text:span text:style-name="T1"> </text:span><text:span text:style-name="T2">(23/11) </text:span> ⲙ̅ⲛ̅ ⲟⲩⲕⲁⲕⲉ ⲙ̅ⲛ̅ ⲟⲩⲟⲉⲓⲛ ⲁⲩ‐ <text:line-break/><text:span text:style-name="T1"> </text:span><text:span text:style-name="T2">(23/12) </text:span> ⲣ̅ⲕⲟⲓⲛⲱⲛⲓ ⲁⲡⲧⲉⲕⲟ· ⲁⲩⲱ ⲉⲃⲟⲗ <text:line-break/><text:span text:style-name="T1"> </text:span><text:span text:style-name="T2">(23/13) </text:span> ϩ̅ⲛ̅ ⲧⲉⲓ̈ⲕⲟⲓⲛⲱⲛⲓⲁ ⲁⲛⲧⲏⲟⲩ ϫⲓ‐ <text:line-break/><text:span text:style-name="T1"> </text:span><text:span text:style-name="T2">(23/14) </text:span> ⲉⲣⲟⲟⲩ ϩ̅ⲛ̅ ⲧⲟⲩⲙⲏⲧⲣⲁ ⲛ̅ⲛⲟⲩ <text:line-break/><text:span text:style-name="T1"> </text:span><text:span text:style-name="T2">(23/15) </text:span> ϩⲃⲏⲧⲉ· ⲉⲃⲟⲗ ϩ̅ⲙ̅ ⲡ̅ⲡⲣⲟⲥⲑⲉⲙⲁ <text:line-break/><text:span text:style-name="T1"> </text:span><text:span text:style-name="T2">(23/16) </text:span> ⲛ̅ⲛ̅ⲇⲁⲓⲙⲱⲛ· ⲁⲩⲱ̅ⲱ̅ ϩ̅ⲛ̅ ⲧⲉⲩ‐ <text:line-break/><text:span text:style-name="T1"> </text:span><text:span text:style-name="T2">(23/17) </text:span> ⲧⲁⲡⲣⲟ ⲛ̅ⲛⲟⲩⲇⲩⲛⲁⲙⲓⲥ· ⲉⲃⲟⲗ <text:line-break/><text:span text:style-name="T1"> </text:span><text:span text:style-name="T2">(23/18) </text:span> ϩ̅ⲛ̅ ⲧⲁ〈ⲛⲁ〉ⲡⲛⲟⲏ ⲁⲩϩⲱⲕ ⲉϩⲟⲩⲛ ⲉ‐ <text:line-break/><text:span text:style-name="T1"> </text:span><text:span text:style-name="T2">(23/19) </text:span> ⲛⲉⲩⲉⲣⲏⲩ ⲛ̅ϭⲓ ⲙ̅ⲙⲏⲧⲣⲁ ⲛ̅ⲛ̅ⲧⲏ‐ <text:line-break/><text:span text:style-name="T1"> </text:span><text:span text:style-name="T2">(23/20) </text:span> ⲟⲩ ϣⲁⲛⲧⲟⲩⲉⲓ ⲛ̅ϭⲓ ⲛ̅ⲭⲣⲟⲛⲟⲥ <text:line-break/><text:span text:style-name="T1"> </text:span><text:span text:style-name="T2">(23/21) </text:span> ⲙ̅ⲡ̅ϫⲡⲟ ⲁⲩⲃⲱⲕ ⲉϩⲣⲁⲓ̈ ⲉⲡⲙⲟⲟⲩ· <text:line-break/><text:span text:style-name="T1"> </text:span><text:span text:style-name="T2">(23/22) </text:span> ⲧⲇⲩⲛⲁⲙⲓⲥ ⲇⲉ ⲛ̅ⲧⲁⲩϫⲡⲟⲥ ⲉⲃⲟⲗ <text:line-break/><text:span text:style-name="T1"> </text:span><text:span text:style-name="T2">(23/23) </text:span> ϩ̅ⲛ̅ ⲧⲁ’ⲛⲁ←ⲡⲛⲟⲏ ϩ̅ⲛ̅ ⲧⲙⲏⲧⲉ ⲛ̅ⲧ’̅ⲧⲣⲓ‐ <text:line-break/><text:span text:style-name="T1"> </text:span><text:span text:style-name="T2">(23/24) </text:span> ⲃⲏ· ⲧⲁⲓ̈ ⲉⲧ’ⲕⲓⲙ ⲁⲡϫⲡⲟ· ⲁⲩⲱ <text:line-break/><text:span text:style-name="T1"> </text:span><text:span text:style-name="T2">(23/25) </text:span> ⲁⲉⲓⲛⲉ ⲛⲓⲙ ⲛ̅ⲡϫⲡⲟ ϫⲓ ⲧⲩⲡⲟⲥ <text:line-break/><text:span text:style-name="T1"> </text:span><text:span text:style-name="T2">(23/26) </text:span> ϩⲣⲁⲓ̈ ⲛ̅ϩⲏⲧ̅ⲥ̅· ⲛ̅ⲧⲁⲣⲟⲩϩⲱⲛ ⲉ‐ <text:line-break/><text:span text:style-name="T1"> </text:span><text:span text:style-name="T2">(23/27) </text:span> ϩⲟⲩⲛ ⲛ̅ϭⲓ ⲛ̅ⲭⲣⲟⲛⲟⲥ ⲙ̅ⲡ̅ϫⲡⲟ <text:line-break/><text:span text:style-name="T1"> </text:span><text:span text:style-name="T2">(23/28) </text:span> ⲁⲩⲥⲱⲟⲩϩ ⲧⲏⲣⲟⲩ ⲛ̅ϭⲓ ⲛ̅ⲧⲏⲩ <text:line-break/><text:span text:style-name="T1"> </text:span><text:span text:style-name="T2">(23/29) </text:span> ⲉⲃⲟⲗ ϩ̅ⲙ̅ ⲡⲙⲟⲟⲩ ⲉⲧ’ϩⲏⲛ ⲉⲡ‐ <text:line-break/><text:span text:style-name="T1"> </text:span><text:span text:style-name="T2">(23/30) </text:span> ⲕⲁϩ· ⲁⲩϫⲡⲟ ⲛ̅ⲁⲕⲁⲑⲁⲣⲥⲓⲁ ⲛⲓⲙ· <text:line-break/><text:span text:style-name="T1"> </text:span><text:span text:style-name="T2">(23/31) </text:span> ⲁⲩⲱ ⲡⲙⲁ ⲛ̅ⲧⲁϥⲃⲱⲕ ⲉⲙⲁⲩ <text:line-break/><text:span text:style-name="T1"> </text:span><text:span text:style-name="T2">(23/32) </text:span> ⲛ̅ϭⲓ ⲡⲧⲏⲩ ⲟⲩⲁⲁϥ ⲁϥⲧⲱϩ ⲙ̅ⲛ̅ <text:line-break/><text:span text:style-name="T1"> </text:span><text:span text:style-name="T2">(23/33) </text:span> ⲧⲁⲕⲁⲑⲁⲣⲥⲓⲁ ⲁⲩϣⲱⲡⲉ ⲉⲃⲟⲗ <text:line-break/><text:span text:style-name="T1"> </text:span><text:span text:style-name="T2">(23/34) </text:span> ⲛ̅ϩⲏⲧ̅ϥ̅ ⲛ̅ϭⲓ ϩⲉⲛⲥⲧⲉⲓⲣⲁ ⲛ̅ⲥϩ̅ⲓ̅ <text:line-break/><text:span text:style-name="T1"> </text:span><text:span text:style-name="T2">(23/35) </text:span> ⲙⲉ ⲙ̅ⲛ̅ ϩⲉⲛⲥⲧⲉⲓⲣⲁ ⲛ̅ϩⲟⲟⲩⲧ’· <text:line-break/><text:span text:style-name="T1"> </text:span><text:span text:style-name="T2">(24/1) </text:span> ⲕⲁⲧⲁ ⲑⲉ ⲅⲁⲣ ⲉⲧⲟⲩⲛⲁϫⲡⲟⲟ[ⲩ] <text:line-break/><text:span text:style-name="T1"> </text:span><text:span text:style-name="T2">(24/2) </text:span> ⲧⲁⲓ̈ ⲧⲉ ⲑⲉ ⲉⲧⲟⲩϫⲡⲟ· ⲉⲧⲃⲉ ⲧⲏ‐ <text:line-break/><text:span text:style-name="T1"> </text:span><text:span text:style-name="T2">(24/3) </text:span> ⲛⲉ ⲁⲡⲓⲛⲉ ⲙ̅ⲡ̅ⲡ̅ⲙⲁ̅ ⲟⲩⲱⲛ̅ϩ̅ ⲉⲃⲟⲗ <text:line-break/><text:span text:style-name="T1"> </text:span><text:span text:style-name="T2">(24/4) </text:span> ϩ̅ⲙ̅ ⲡⲕⲁϩ ⲙ̅ⲛ̅ ⲡⲙⲟⲟⲩ· ⲛ̅ⲧⲱⲧ̅ⲛ̅ <text:line-break/><text:span text:style-name="T1"> </text:span><text:span text:style-name="T2">(24/5) </text:span> ⲅⲁⲣ ⲧⲉⲧ̅ⲛ̅ⲧ̅ⲛ̅ⲧⲱⲛ ⲉⲡⲟⲩⲟⲉⲓⲛ· <text:line-break/><text:span text:style-name="T1"> </text:span><text:span text:style-name="T2">(24/6) </text:span> ⲟⲩⲛ̅ⲧⲏⲧ̅ⲛ̅ ⲅⲁⲣ ⲙ̅ⲙⲁⲩ ⲛ̅ⲟⲩⲙⲉ <text:line-break/><text:span text:style-name="T1"> </text:span><text:span text:style-name="T2">(24/7) </text:span> ⲣⲟⲥ ⲛ̅ⲧⲉ ⲛ̅ⲧⲏⲩ ⲙ̅ⲛ̅ ⲛ̅ⲇⲁⲓⲙⲱⲛ· <text:line-break/><text:span text:style-name="T1"> </text:span><text:span text:style-name="T2">(24/8) </text:span> ⲁⲩⲱ ⲟⲩⲙⲉⲉⲩⲉ ⲉⲃⲟⲗ ϩ̅ⲙ̅ ⲡⲟⲩ‐ <text:line-break/><text:span text:style-name="T1"> </text:span><text:span text:style-name="T2">(24/9) </text:span> ⲟⲉⲓⲛ ⲛ̅ⲧⲇⲩⲛⲁⲙⲓⲥ ⲙ̅ⲡ̅ⲑⲁⲩⲙⲁ· <text:line-break/><text:span text:style-name="T1"> </text:span><text:span text:style-name="T2">(24/10) </text:span> ⲟⲩⲟⲛ ⲅⲁⲣ ⲛⲓⲙ ⲛ̅ⲧⲁϥϫⲡⲟϥ ⲉⲃⲟⲗ <text:line-break/><text:span text:style-name="T1"> </text:span><text:span text:style-name="T2">(24/11) </text:span> ϩ̅ⲛ̅ ⲧⲙⲏⲧⲣⲁ ϩ̅ⲓ̅ϫ̅ⲙ̅ ⲡⲕⲁϩ· ⲛ̅ⲧⲁϥ‐ <text:line-break/><text:span text:style-name="T1"> </text:span><text:span text:style-name="T2">(24/12) </text:span> ϣⲱⲡⲉ ⲛⲁⲥ ⲁⲛ ⲉⲩⲁⲅⲁⲑⲟⲛ· ⲡⲉⲥ‐ <text:line-break/><text:span text:style-name="T1"> </text:span><text:span text:style-name="T2">(24/13) </text:span> ⲁϣⲁϩⲟⲙ ⲇⲉ ⲙ̅ⲛ̅ ⲡⲉⲥϯ ⲧⲕⲁⲥ ⲉ‐ <text:line-break/><text:span text:style-name="T1"> </text:span><text:span text:style-name="T2">(24/14) </text:span> ⲧⲃⲉ ⲡⲓⲛⲉ ⲉⲣⲟⲩⲱⲛ̅ϩ̅ ⲉⲃⲟⲗ ϩ̅ⲛ̅ <text:line-break/><text:span text:style-name="T1"> </text:span><text:span text:style-name="T2">(24/15) </text:span> ⲧⲏⲛⲉ ⲉⲃⲟⲗ ϩ̅ⲙ̅ ⲡ̅ⲛⲁ̅· ⲧⲉⲧ̅ⲛ̅ϫⲟ‐ <text:line-break/><text:span text:style-name="T1"> </text:span><text:span text:style-name="T2">(24/16) </text:span> ⲥⲉ ⲅⲁⲣ ϩ̅ⲙ̅ ⲡⲉⲧ̅ⲛ̅ϩⲏⲧ’· ⲟⲩⲙ̅ⲛⲧ’̅‐ <text:line-break/><text:span text:style-name="T1"> </text:span><text:span text:style-name="T2">(24/17) </text:span> ⲙⲁⲕⲁⲣⲓⲟⲥ ⲇⲉ ⲧⲉ ⲥⲏⲉⲙ ⲉⲩϣⲁⲛ <text:line-break/><text:soft-page-break/><text:span text:style-name="T1"> </text:span><text:span text:style-name="T2">(24/18) </text:span> ϯ ⲛ̅ⲛⲟⲩⲙⲉⲣⲓⲥ ⲛ̅ⲟⲩⲁ ⲛ̅ϥⲓ ⲉⲃⲟⲗ <text:line-break/><text:span text:style-name="T1"> </text:span><text:span text:style-name="T2">(24/19) </text:span> ϩ̅ⲛ̅ ⲧⲯⲩⲭⲏ ⲉϩⲟⲩⲛ ⲉⲡⲙⲉⲉⲩⲉ <text:line-break/><text:span text:style-name="T1"> </text:span><text:span text:style-name="T2">(24/20) </text:span> ⲙ̅ⲡⲟⲩⲟⲉⲓⲛ· ⲧⲯⲩⲭⲏ ⲅⲁⲣ ⲉⲥ‐ <text:line-break/><text:span text:style-name="T1"> </text:span><text:span text:style-name="T2">(24/21) </text:span> ϣⲟⲟⲡ ⲛ̅ⲃⲁⲣⲟⲥ ⲙ̅ⲡⲕⲁⲕⲉ· ⲁⲩⲱ <text:line-break/><text:span text:style-name="T1"> </text:span><text:span text:style-name="T2">(24/22) </text:span> ⲛⲉⲧ’ⲥⲟⲟⲩⲛ ϫⲉ ⲛ̅ⲧⲁⲧⲛⲟⲩⲛⲉ <text:line-break/><text:span text:style-name="T1"> </text:span><text:span text:style-name="T2">(24/23) </text:span> ⲛ̅ⲧⲯⲩⲭⲏ ⲉⲓ ⲉⲃⲟⲗ ⲧⲱⲛ· ⲥⲉⲛⲁϣ‐ <text:line-break/><text:span text:style-name="T1"> </text:span><text:span text:style-name="T2">(24/24) </text:span> ϭⲁⲙϭ̅ⲙ̅ ⲛ̅ⲥⲁ ⲧⲕⲉⲫⲩⲥⲓⲥ· ⲉⲧ’‐ <text:line-break/><text:span text:style-name="T1"> </text:span><text:span text:style-name="T2">(24/25) </text:span> ⲯⲩⲭⲏ ⲅⲁⲣ ϣⲟⲟⲡ ⲛ̅ⲉⲣⲅⲟⲛ ⲛ̅ⲧⲁ‐ <text:line-break/><text:span text:style-name="T1"> </text:span><text:span text:style-name="T2">(24/26) </text:span> ⲕⲁⲑⲁⲣⲥⲓⲁ· ⲁⲩⲱ ⲛ̅ϣⲱⲥ ⲙ̅ⲡ̅‐ <text:line-break/><text:span text:style-name="T1"> </text:span><text:span text:style-name="T2">(24/27) </text:span> ⲙⲉⲉⲩⲉ ⲛ̅ⲟⲩⲟⲉⲓⲛ· ⲁⲛⲟⲕ ⲅⲁⲣ <text:line-break/><text:span text:style-name="T1"> </text:span><text:span text:style-name="T2">(24/28) </text:span> ⲡⲉ ⲡⲉⲣⲟⲩⲱⲛ̅ϩ̅ ⲉⲃⲟⲗ ⲙ̅ⲡⲕⲱ‐ <text:line-break/><text:span text:style-name="T1"> </text:span><text:span text:style-name="T2">(24/29) </text:span> ⲧⲉ ⲙ̅ⲡⲁⲅⲉⲛⲛⲏⲧⲟⲛ ⲧⲏⲣ̅ϥ̅· ϣⲓ‐ <text:line-break/><text:span text:style-name="T1"> </text:span><text:span text:style-name="T2">(24/30) </text:span> ⲛⲁ ⲇⲉ ⲉϥⲛⲁⲙⲟⲩϩ ⲛ̅ϭⲓ ⲡⲛⲟⲃⲉ <text:line-break/><text:span text:style-name="T1"> </text:span><text:span text:style-name="T2">(24/31) </text:span> ⲛ̅ⲧⲫⲩⲥⲓⲥ· ⲧⲙⲏⲧⲣⲁ ⲛ̅ⲧⲁⲩ <text:line-break/><text:span text:style-name="T1"> </text:span><text:span text:style-name="T2">(24/32) </text:span> ϣ̅ⲣ̅ϣⲱⲣ̅ⲥ̅ ⲁⲉⲓⲧⲣⲉⲥⲁⲛⲁⲉⲓ· <text:line-break/><text:span text:style-name="T1"> </text:span><text:span text:style-name="T2">(24/33) </text:span> ⲧⲙ̅ⲛ̅ⲧ̅’̅ⲥⲁⲃⲉ ⲛ̅ⲃ̅ⲗ̅ⲗⲏ· ϣⲓⲛⲁ ⲉⲓ̈ <text:line-break/><text:span text:style-name="T1"> </text:span><text:span text:style-name="T2">(24/34) </text:span> ⲛⲁϣⲟⲩⲱⲥ̅ϥ̅· ⲁⲩⲱ ⲛ̅ⲧⲁⲣⲓ‐ <text:line-break/><text:span text:style-name="T1"> </text:span><text:span text:style-name="T2">(25/1) </text:span> ⲟ̣ⲩⲱϣ ⲁϥⲙⲉⲉⲩⲉ ⲙ̅ⲛ̅ ⲡⲙⲟ‐ <text:line-break/><text:span text:style-name="T1"> </text:span><text:span text:style-name="T2">(25/2) </text:span> ⲟⲩ ⲛ̅ⲕⲁⲕⲉ· ⲁⲩⲱ ⲙ̅ⲛ̅ ⲡⲕⲁⲕⲉ <text:line-break/><text:span text:style-name="T1"> </text:span><text:span text:style-name="T2">(25/3) </text:span> ⲉⲧⲣⲉⲩϣⲱϭⲉ ⲛ̅ⲉⲓⲇⲟⲥ ⲛⲓⲙ ⲛ̅‐ <text:line-break/><text:span text:style-name="T1"> </text:span><text:span text:style-name="T2">(25/4) </text:span> ⲧⲉ ⲡⲉⲧ̅ⲛ̅ϩⲏⲧ’· ⲉⲡⲓⲇⲏ ⲉⲃⲟⲗ <text:line-break/><text:span text:style-name="T1"> </text:span><text:span text:style-name="T2">(25/5) </text:span> ϩ̅ⲙ̅ ⲡⲟⲩⲱϣ ⲙ̅ⲡⲟⲩⲟⲉⲓⲛ ⲙ̅ⲡ̅ <text:line-break/><text:span text:style-name="T1"> </text:span><text:span text:style-name="T2">(25/6) </text:span> ⲡ̅ⲛ̅ⲁ̅· ⲁⲩⲕⲁⲧ’ ⲧⲏⲛⲏ ⲁⲩⲥⲁⲛ̅ϩ̅ <text:line-break/><text:span text:style-name="T1"> </text:span><text:span text:style-name="T2">(25/7) </text:span> ⲧⲏⲛⲉ ϩ̅ⲛ̅ ⲟⲩⲡⲓⲥⲧⲓⲥ· ϫⲉⲕⲁⲁⲥ <text:line-break/><text:span text:style-name="T1"> </text:span><text:span text:style-name="T2">(25/8) </text:span> ⲇⲉ ⲉϥⲛⲁⲟⲩⲱⲥ̅ϥ̅ ⲛ̅ϭⲓ ⲡⲉϥⲙⲉ <text:line-break/><text:span text:style-name="T1"> </text:span><text:span text:style-name="T2">(25/9) </text:span> ⲉⲩⲉ· ⲁϥϫⲟⲟⲩ ⲛ̅ⲛⲟⲩⲇⲁⲓⲙⲱⲛ <text:line-break/><text:span text:style-name="T1"> </text:span><text:span text:style-name="T2">(25/10) </text:span> ϫⲉⲕⲁⲁⲥ ⲉⲩⲛⲁⲧⲁϣⲉ ⲟⲉⲓϣ ⲙ̅‐ <text:line-break/><text:span text:style-name="T1"> </text:span><text:span text:style-name="T2">(25/11) </text:span> ⲡⲙⲉⲉⲩⲉ ⲛ̅ⲧⲉⲥⲕⲁϭⲓⲁ· ⲛ̅ϥⲓⲣⲉ <text:line-break/><text:span text:style-name="T1"> </text:span><text:span text:style-name="T2">(25/12) </text:span> ⲛ̅ⲟⲩⲕⲁⲧⲁⲕⲗⲩⲥⲙⲟⲥ ⲛ̅ϥ̅ϥⲱⲧⲉ <text:line-break/><text:span text:style-name="T1"> </text:span><text:span text:style-name="T2">(25/13) </text:span> ⲉⲃⲟⲗ ⲛ̅ⲧⲉⲧ̅ⲛ̅ⲅⲉⲛⲉⲁ· ϣⲓⲛⲁ ⲉϥ‐ <text:line-break/><text:span text:style-name="T1"> </text:span><text:span text:style-name="T2">(25/14) </text:span> ⲛⲁϥⲓ ⲙ̅ⲡⲟⲩⲟⲉⲓⲛ ⲛ̅ϥ̅ϫⲓ ⲉⲃⲟⲗ <text:line-break/><text:span text:style-name="T1"> </text:span><text:span text:style-name="T2">(25/15) </text:span> ϩ̅ⲛ̅ ⲧⲡⲓⲥⲧⲓⲥ· ⲁⲛⲟⲕ ⲇⲉ ⲁⲉⲓⲣ̅ⲕⲏ <text:line-break/><text:span text:style-name="T1"> </text:span><text:span text:style-name="T2">(25/16) </text:span> ⲣⲩⲥⲥⲉ ϩ̅ⲛ̅ ⲟⲩϭⲉⲡⲏ ϩ̅ⲛ̅ ⲧⲁⲡⲣⲟ ⲙ̅‐ <text:line-break/><text:span text:style-name="T1"> </text:span><text:span text:style-name="T2">(25/17) </text:span> ⲡⲇⲁⲓⲙⲱⲛ ⲉⲧⲣⲉⲟⲩⲡⲩⲣⲅⲟⲥ <text:line-break/><text:span text:style-name="T1"> </text:span><text:span text:style-name="T2">(25/18) </text:span> ϣⲱⲡⲉ ϣⲁ ⲧϣ̅ⲗ̅ⲙⲉ ⲙ̅ⲡⲟⲩⲟⲉⲓⲛ· <text:line-break/><text:span text:style-name="T1"> </text:span><text:span text:style-name="T2">(25/19) </text:span> ⲉⲣϣⲱϫ̅ⲡ̅ ϩ̅ⲛ̅ ⲛ̅ⲇⲁⲓⲙⲱⲛ ⲙ̅ⲛ̅ <text:line-break/><text:span text:style-name="T1"> </text:span><text:span text:style-name="T2">(25/20) </text:span> ⲧⲟⲩⲅⲉⲛⲉⲁ· ⲡⲁⲓ̈ ⲛⲉϥϣⲟⲟⲡ ⲙ̅‐ <text:line-break/><text:span text:style-name="T1"> </text:span><text:span text:style-name="T2">(25/21) </text:span> ⲙⲟⲟⲩ· ϣⲓⲛⲁ ⲉⲩⲛⲁϩⲁⲣⲉϩ ⲉⲡ‐ <text:line-break/><text:span text:style-name="T1"> </text:span><text:span text:style-name="T2">(25/22) </text:span> ⲇⲁⲓⲙⲱⲛ ⲉⲡⲭⲁⲟⲥ ⲉⲧ’ϣⲧ̅ⲣ̅ⲧⲱⲣ· <text:line-break/><text:span text:style-name="T1"> </text:span><text:span text:style-name="T2">(25/23) </text:span> ⲛⲁⲓ̈ ⲇⲉ ⲁⲧⲙⲏⲧⲣⲁ ⲙⲉⲉⲩⲉ ⲉⲣⲟ‐ <text:line-break/><text:span text:style-name="T1"> </text:span><text:span text:style-name="T2">(25/24) </text:span> ⲟⲩ ⲕⲁⲧⲁ ⲡⲁⲟⲩⲱϣ· ϣⲓⲛⲁ ⲉⲥⲛⲁ‐ <text:line-break/><text:span text:style-name="T1"> </text:span><text:span text:style-name="T2">(25/25) </text:span> ⲡⲱϩ̅ⲧ̅’̅ ⲉⲃⲟⲗ ⲧⲏⲣ̅ⲥ̅· ⲁⲩⲡⲩⲣⲅⲟⲥ <text:line-break/><text:span text:style-name="T1"> </text:span><text:span text:style-name="T2">(25/26) </text:span> ϣⲱⲡⲉ ϩ̅ⲓ̅ⲧ̅ⲛ̅ ⲛ̅ⲇⲁⲓⲙⲱⲛ· ⲁⲡ‐ <text:line-break/><text:span text:style-name="T1"> </text:span><text:span text:style-name="T2">(25/27) </text:span> ⲕⲁⲕⲉ ϣⲧⲟⲣⲧ̅ⲣ̅ ϩ̅ⲙ̅ ⲡⲉϥϣⲧⲁ· <text:line-break/><text:span text:style-name="T1"> </text:span><text:span text:style-name="T2">(25/28) </text:span> ⲁϥⲃⲱⲗ ⲉⲃⲟⲗ ⲛ̅ⲛ̅ⲙ̅ⲙⲟⲩⲧ’ ⲛ̅ⲧ̅‐ <text:line-break/><text:span text:style-name="T1"> </text:span><text:span text:style-name="T2">(25/29) </text:span> ⲙⲏⲧⲣⲁ· ⲁⲩⲱ ⲁⲩϩⲁⲣⲉϩ ⲉⲡⲇⲁⲓ‐ <text:line-break/><text:span text:style-name="T1"> </text:span><text:span text:style-name="T2">(25/30) </text:span> ⲙⲱⲛ ⲉⲧ̅ⲛ̅ⲛⲏⲩ ⲉϩⲟⲩⲛ ⲉⲡⲡⲩⲣ‐ <text:line-break/><text:soft-page-break/><text:span text:style-name="T1"> </text:span><text:span text:style-name="T2">(25/31) </text:span> ⲅⲟⲥ· ϫⲉⲕⲁⲁⲥ ⲉⲣⲉⲛ̅ⲅⲉⲛⲉⲁ ⲛⲁ‐ <text:line-break/><text:span text:style-name="T1"> </text:span><text:span text:style-name="T2">(25/32) </text:span> ⲙⲟⲩⲛ ⲉⲃⲟⲗ ⲛ̅ⲥⲉϫⲡⲉ ⲥⲩⲥⲧⲁ‐ <text:line-break/><text:span text:style-name="T1"> </text:span><text:span text:style-name="T2">(25/33) </text:span> ⲥⲓⲥ ⲉⲃⲟⲗ ϩ̅ⲓ̅ⲧⲟⲟⲧ̅ϥ̅· ⲟⲩⲛ̅ⲧⲉϥ‐ <text:line-break/><text:span text:style-name="T1"> </text:span><text:span text:style-name="T2">(25/34) </text:span> ⲇⲩⲛⲁⲙⲓⲥ ⲅⲁⲣ ⲉⲃⲟⲗ ϩ̅ⲛ̅ ⲉⲓⲛⲉ <text:line-break/><text:span text:style-name="T1"> </text:span><text:span text:style-name="T2">(25/35) </text:span> ⲛⲓⲙ· ⲛⲟⲟⲩϩ̅ⲕ̅ ϫⲓⲛⲡⲓⲛⲁⲩ‐ <text:line-break/><text:span text:style-name="T1"> </text:span><text:span text:style-name="T2">(26/1) </text:span> ⲱ ⲥ̅ⲏ̅ⲉ̅ⲙ̅ ⲛ̅ⲅ̅ϣⲱⲡⲉ ϩ̅ⲛ̅ ⲟⲩⲛ̣[ⲟϭ] <text:line-break/><text:span text:style-name="T1"> </text:span><text:span text:style-name="T2">(26/2) </text:span> ⲛ̅ⲣⲁϣⲉ ⲛ̅ⲧⲉ ⲧⲉⲕⲅⲉⲛⲉⲁ ⲙ̅ⲛ̅ [ⲧ]‐ <text:line-break/><text:span text:style-name="T1"> </text:span><text:span text:style-name="T2">(26/3) </text:span> ⲡⲓⲥⲧⲓⲥ· ϫⲉ ⲭⲱⲣⲓⲥ ⲥⲱⲙⲁ ϩ̅ⲓ̅ ⲁ‐ <text:line-break/><text:span text:style-name="T1"> </text:span><text:span text:style-name="T2">(26/4) </text:span> ⲛⲁⲅⲕⲏ ⲥⲉⲣ̅ⲧⲏⲣⲓ ⲙ̅ⲙⲟⲥ ⲁⲥⲱ‐ <text:line-break/><text:span text:style-name="T1"> </text:span><text:span text:style-name="T2">(26/5) </text:span> ⲙⲁ ⲛⲓⲙ ⲛ̅ⲕⲁⲕⲉ· ⲉⲥⲣ̅ⲙⲁⲣⲧⲩⲣⲓ <text:line-break/><text:span text:style-name="T1"> </text:span><text:span text:style-name="T2">(26/6) </text:span> ⲛ̅ⲛⲉⲧⲟⲩⲁⲁⲃ ⲛ̅ⲧⲉ ⲧⲙ̅ⲛ̅ⲧ̅’̅ⲛⲟϭ· <text:line-break/><text:span text:style-name="T1"> </text:span><text:span text:style-name="T2">(26/7) </text:span> ⲡⲉⲣϭⲱⲗ̅ⲡ̅ ⲉⲃⲟⲗ ⲛⲁⲩ ϩ̅ⲙ̅ ⲡⲟⲩ‐ <text:line-break/><text:span text:style-name="T1"> </text:span><text:span text:style-name="T2">(26/8) </text:span> ⲙⲉⲉⲩⲉ ϩ̅ⲙ̅ ⲡⲁⲟⲩⲱϣⲉ· ⲁⲩⲱ <text:line-break/><text:span text:style-name="T1"> </text:span><text:span text:style-name="T2">(26/9) </text:span> ⲥⲉⲛⲁⲙ̅ⲧⲟⲛ ⲙ̅ⲙⲟⲟⲩ ϩ̅ⲙ̅ ⲡ̅ⲛⲁ̅ ⲛ̅‐ <text:line-break/><text:span text:style-name="T1"> </text:span><text:span text:style-name="T2">(26/10) </text:span> ⲁⲅⲉⲛⲛⲏⲧⲟⲛ ⲉⲛⲥⲉⲣ̅ ⲗⲩⲡⲏ ⲁⲛ· <text:line-break/><text:span text:style-name="T1"> </text:span><text:span text:style-name="T2">(26/11) </text:span> ⲛ̅ⲧⲟⲕ ⲇⲉ ⲥ̅ⲏ̅ⲉ̅ⲙ̅ ⲉⲧⲃⲉⲡⲁⲓ̈ ⲁⲕ‐ <text:line-break/><text:span text:style-name="T1"> </text:span><text:span text:style-name="T2">(26/12) </text:span> ϭⲱ ϩ̅ⲛ̅ ⲥⲱⲙⲁ ⲙ̅ⲡⲃⲟⲗ ⲛ̅ⲧⲕⲗⲟⲟⲗⲉ <text:line-break/><text:span text:style-name="T1"> </text:span><text:span text:style-name="T2">(26/13) </text:span> ⲛ̅ⲟⲩⲟⲉⲓⲛ ϫⲉⲕⲁⲁⲥ ⲉⲕⲛⲁⲣ̅ϩⲩⲡⲟ <text:line-break/><text:span text:style-name="T1"> </text:span><text:span text:style-name="T2">(26/14) </text:span> ⲙⲓⲛⲉ ⲙ̅ⲛ̅ ⲧⲡⲓⲥⲧⲓⲥ· ⲁⲩⲱ ⲧⲡⲓⲥ‐ <text:line-break/><text:span text:style-name="T1"> </text:span><text:span text:style-name="T2">(26/15) </text:span> ⲧⲓⲥ ⲛ̅ⲛⲏⲩ ϣⲁⲣⲟⲕ· ⲥⲉⲛⲁϥⲓ ⲡⲉⲥ‐ <text:line-break/><text:span text:style-name="T1"> </text:span><text:span text:style-name="T2">(26/16) </text:span> ⲙⲉⲉⲩⲉ ⲛ̅ⲥⲉⲧⲁⲁϥ ⲛⲁⲕ ϩ̅ⲛ̅ ⲟⲩⲥⲩⲛ‐ <text:line-break/><text:span text:style-name="T1"> </text:span><text:span text:style-name="T2">(26/17) </text:span> ⲉⲓⲇⲏⲥⲓⲥ ⲛ̅ⲟⲩⲟⲉⲓⲛ· ⲛⲁⲓ̈ ⲇⲉ ⲁⲉⲓ‐ <text:line-break/><text:span text:style-name="T1"> </text:span><text:span text:style-name="T2">(26/18) </text:span> ⲧⲁⲙⲟⲕ ⲉⲣⲟⲟⲩ ⲁⲧⲱⲫⲉⲗⲓⲁ ⲛ̅ⲧⲉⲕ‐ <text:line-break/><text:span text:style-name="T1"> </text:span><text:span text:style-name="T2">(26/19) </text:span> ⲅⲉⲛⲉⲁ ⲉⲃⲟⲗ ϩ̅ⲛ̅ ⲧⲕⲗⲟⲟⲗⲉ ⲛ̅ⲟⲩⲟ‐ <text:line-break/><text:span text:style-name="T1"> </text:span><text:span text:style-name="T2">(26/20) </text:span> ⲉⲓⲛ· ⲁⲩⲱ ⲛⲉϯⲛⲁϫⲟⲟⲩ ⲛⲁⲕ ϩⲟ‐ <text:line-break/><text:span text:style-name="T1"> </text:span><text:span text:style-name="T2">(26/21) </text:span> ⲙⲟⲓⲱⲥ ⲉⲧⲃⲉ ϩⲱⲃ ⲛⲓⲙ· ϯⲛⲁⲟⲩ‐ <text:line-break/><text:span text:style-name="T1"> </text:span><text:span text:style-name="T2">(26/22) </text:span> ⲟⲛϩⲟⲩ ⲉⲃⲟⲗ ⲛⲁⲕ ϣⲁϩⲁⲉ· ϣⲓⲛⲁ‐ <text:line-break/><text:span text:style-name="T1"> </text:span><text:span text:style-name="T2">(26/23) </text:span> ⲉⲕⲛⲁⲟⲩⲟⲛϩⲟⲩ ⲉⲃⲟⲗ ⲛ̅ⲛⲉⲧ’‐ <text:line-break/><text:span text:style-name="T1"> </text:span><text:span text:style-name="T2">(26/24) </text:span> ⲛⲁϣⲱⲡⲉ ϩ̅ⲓ̅ϫ̅ⲙ̅ ⲡⲕⲁϩ ⲙ̅ⲡⲙⲉϩ‐ <text:line-break/><text:span text:style-name="T1"> </text:span><text:span text:style-name="T2">(26/25) </text:span> ⲥⲉⲡ ⲥⲛⲁⲩ· ⲱ ⲥ̅ⲏ̅ⲉ̅ⲙ̅ ⲧⲕⲓⲛⲏⲥⲓⲥ <text:line-break/><text:span text:style-name="T1"> </text:span><text:span text:style-name="T2">(26/26) </text:span> ⲉⲣϣⲱⲡⲉ ϩ̅ⲙ̅ ⲡⲁⲟⲩⲱϣⲉ· ⲛ̅ⲧⲁⲥ <text:line-break/><text:span text:style-name="T1"> </text:span><text:span text:style-name="T2">(26/27) </text:span> ϣⲱⲡⲉ ϣⲓⲛⲁ ⲉⲣⲉⲧⲫⲩⲥⲓⲥ ⲛⲁ‐ <text:line-break/><text:span text:style-name="T1"> </text:span><text:span text:style-name="T2">(26/28) </text:span> ϣⲱⲡⲉ ⲉⲥϣⲟⲩⲉⲓⲧ’· ⲁϥⲙ̅ⲧⲟⲛ <text:line-break/><text:span text:style-name="T1"> </text:span><text:span text:style-name="T2">(26/29) </text:span> ⲅⲁⲣ ⲙ̅ⲙⲟϥ ⲛ̅ϭⲓ ⲡⲛⲟⲩϭ〈ⲥ̅〉 ⲙ̅ⲡⲕⲁⲕⲉ· <text:line-break/><text:span text:style-name="T1"> </text:span><text:span text:style-name="T2">(26/30) </text:span> ⲱ̅ ⲥ̅ⲏ̅ⲉ̅ⲙ̅· ⲁⲩⲧ̅ⲙ̅ ⲣⲱϥ ⲙ̅ⲡⲕⲁⲕⲉ· <text:line-break/><text:span text:style-name="T1"> </text:span><text:span text:style-name="T2">(26/31) </text:span> ⲟⲩⲕⲉⲧⲓ ϥⲟⲩⲟⲛ̅ϩ̅ ⲉⲃⲟⲗ ϩ̅ⲛ̅ ⲧⲕⲧⲓ‐ <text:line-break/><text:span text:style-name="T1"> </text:span><text:span text:style-name="T2">(26/32) </text:span> ⲥⲓⲥ ⲛ̅ϭⲓ ⲡⲟⲩⲟⲉⲓⲛ ⲉⲣⲡⲓⲣⲉ ⲛⲁⲥ· <text:line-break/><text:span text:style-name="T1"> </text:span><text:span text:style-name="T2">(26/33) </text:span> ⲕⲁⲧⲁ ⲡⲁⲟⲩⲱϣ· ⲁⲩⲱ ⲛ̅ⲧⲁⲣⲉ <text:line-break/><text:span text:style-name="T1"> </text:span><text:span text:style-name="T2">(26/34) </text:span> ⲧⲫⲩⲥⲓⲥ ϫⲟⲟⲥ ϫⲉ ⲁϥϫⲱⲕ ⲉⲃⲟⲗ <text:line-break/><text:span text:style-name="T1"> </text:span><text:span text:style-name="T2">(26/35) </text:span> ⲛ̅ϭⲓ ⲡⲉⲥⲟⲩⲱϣ· ⲧⲟⲧⲉ ⲁⲉⲓⲇⲟⲥ <text:line-break/><text:span text:style-name="T1"> </text:span><text:span text:style-name="T2">(26/36) </text:span> ⲛⲓⲙ ⲱⲙ̅ⲕ̅ ⲉⲡⲓⲧ̅ⲛ̅ ⲁⲛⲙⲟⲩⲓ̈ⲏ <text:line-break/><text:span text:style-name="T1"> </text:span><text:span text:style-name="T2">(27/1) </text:span> [ϩ̅]̅ⲛ̅ ⲟⲩⲙ̅ⲛⲧ’̅ⲁⲧⲥⲟⲟⲩⲛ ⲉⲥϣⲟⲩ‐ <text:line-break/><text:span text:style-name="T1"> </text:span><text:span text:style-name="T2">(27/2) </text:span> ϣⲟⲩ ⲙ̅ⲙⲟⲥ· ⲁⲥⲕⲧⲟ ⲛ̅ⲧⲉⲥ <text:line-break/><text:span text:style-name="T1"> </text:span><text:span text:style-name="T2">(27/3) </text:span> ⲧⲁⲡⲣⲟ ⲛ̅ⲕⲁⲕⲉ ⲁⲥⲛⲟⲩϫⲉ ⲉⲃⲟⲗ <text:line-break/><text:span text:style-name="T1"> </text:span><text:span text:style-name="T2">(27/4) </text:span> ⲙ̅ⲙⲟⲥ ⲛ̅ⲧⲇⲩⲛⲁⲙⲓⲥ ⲛ̅ⲕⲱϩ̅ⲧ̅’̅ <text:line-break/><text:span text:style-name="T1"> </text:span><text:span text:style-name="T2">(27/5) </text:span> ⲧⲉⲧ’ϣⲟⲟⲡ ⲛ̅ϩⲏⲧ̅ⲥ̅ ϫⲓⲛⲛ̅ϣⲟ‐ <text:line-break/><text:span text:style-name="T1"> </text:span><text:span text:style-name="T2">(27/6) </text:span> ⲣ̅ⲡ̅ ⲉⲃⲟⲗ ϩ̅ⲛ̅ 〈ⲧ〉ⲧⲣⲓⲃⲏ ⲙ̅ⲡⲕⲁⲕⲉ ⲁϥ‐ <text:line-break/><text:soft-page-break/><text:span text:style-name="T1"> </text:span><text:span text:style-name="T2">(27/7) </text:span> ϫⲓⲥⲉ ⲙ̅ⲙⲟϥ ⲁϥⲣ̅ⲟⲩⲟⲉⲓⲛ ⲉϫ̅ⲛ̅ <text:line-break/><text:span text:style-name="T1"> </text:span><text:span text:style-name="T2">(27/8) </text:span> ⲧⲕⲧⲓⲥⲓⲥ ⲧⲏⲣ̅ⲥ̅ ⲛ̅ϣ̅ⲃ̅ⲃⲓⲱ ⲙ̅ⲡⲇⲓ‐ <text:line-break/><text:span text:style-name="T1"> </text:span><text:span text:style-name="T2">(27/9) </text:span> ⲕⲁⲓⲟⲥ· ⲁⲩⲱ ⲛⲉⲥⲙⲟⲣⲫⲏ ⲧⲏ‐ <text:line-break/><text:span text:style-name="T1"> </text:span><text:span text:style-name="T2">(27/10) </text:span> ⲣⲟⲩ ⲁⲩⲧⲁⲩⲟ ⲉⲃⲟⲗ ⲛ̅ⲛⲟⲩⲇⲩⲛⲁ‐ <text:line-break/><text:span text:style-name="T1"> </text:span><text:span text:style-name="T2">(27/11) </text:span> ⲙⲓⲥ ⲛ̅ⲑⲉ ⲛ̅ⲛⲓϣⲁϩ ⲛ̅ⲕⲱϩ̅ⲧ̅’̅ ϣⲁ‐ <text:line-break/><text:span text:style-name="T1"> </text:span><text:span text:style-name="T2">(27/12) </text:span> ϩⲣⲁⲓ̈ ⲉⲧⲡⲉ· ⲉⲩⲃⲟⲏⲑⲉⲓⲁ ⲙ̅ⲡⲟⲩ‐ <text:line-break/><text:span text:style-name="T1"> </text:span><text:span text:style-name="T2">(27/13) </text:span> ⲟⲉⲓⲛ ⲉⲣϫⲱϩ̅ⲙ̅ ⲡⲁⲓ̈ ⲛ̅ⲧⲁϥϫⲁⲥⲧ̅ϥ̅· <text:line-break/><text:span text:style-name="T1"> </text:span><text:span text:style-name="T2">(27/14) </text:span> ⲛⲉⲩϣⲟⲟⲡ ⲅⲁⲣ ⲙ̅ⲙⲉⲗⲟⲥ ⲙ̅ⲡⲕⲱ‐ <text:line-break/><text:span text:style-name="T1"> </text:span><text:span text:style-name="T2">(27/15) </text:span> ϩ̅ⲧ̅’̅ ⲉⲧ’ϣⲧ̅ⲣ̅ⲧⲱⲣ· ⲁⲩⲱ ⲙ̅ⲡⲉⲥ <text:line-break/><text:span text:style-name="T1"> </text:span><text:span text:style-name="T2">(27/16) </text:span> ⲉⲓⲙⲉ ϫⲉ ⲛ̅ⲧⲁⲥⲣ̅ⲃⲗⲁⲡⲧⲉⲓ ⲙ̅ⲙⲟⲥ <text:line-break/><text:span text:style-name="T1"> </text:span><text:span text:style-name="T2">(27/17) </text:span> ⲟⲩⲁⲁⲥ· ⲛ̅ⲧⲁⲣⲉⲥⲛⲉϫ ⲧⲇⲩⲛⲁⲙⲓⲥ <text:line-break/><text:span text:style-name="T1"> </text:span><text:span text:style-name="T2">(27/18) </text:span> ⲉⲃⲟⲗ ⲉⲧⲉ ⲟⲩⲛ̅ⲧⲉⲥ ⲇⲩⲛⲁⲙⲓⲥ <text:line-break/><text:span text:style-name="T1"> </text:span><text:span text:style-name="T2">(27/19) </text:span> ⲁⲥⲛⲟϫ̅ⲥ̅ ⲉⲃⲟⲗ ϩ̅ⲛ̅ ⲛ̅ⲣⲁⲧⲱϭⲉ· ⲡⲇⲉ‐ <text:line-break/><text:span text:style-name="T1"> </text:span><text:span text:style-name="T2">(27/20) </text:span> ⲙⲱⲛ ⲉⲧ’ϣⲟⲟⲡ ⲙ̅ⲡⲗⲁⲛⲟⲥ ⲡⲉⲣ‐ <text:line-break/><text:span text:style-name="T1"> </text:span><text:span text:style-name="T2">(27/21) </text:span> ⲕⲓⲙ ⲉⲧ’ⲙⲏⲧⲣⲁ ⲁⲉⲓⲇⲟⲥ ⲛⲓⲙ· <text:line-break/><text:span text:style-name="T1"> </text:span><text:span text:style-name="T2">(27/22) </text:span> ⲁⲩⲱ ϩ̅ⲛ̅ ⲧⲉⲥⲙ̅ⲛⲧ’̅ⲁⲧⲥⲟⲟⲩⲛ <text:line-break/><text:span text:style-name="T1"> </text:span><text:span text:style-name="T2">(27/23) </text:span> ϩⲱ{ⲱ}ⲥ ⲉⲥϫⲉ ⲉⲥⲉⲓⲣⲉ ⲛ̅ⲟⲩⲛⲟϭ <text:line-break/><text:span text:style-name="T1"> </text:span><text:span text:style-name="T2">(27/24) </text:span> ⲛ̅ϩⲱⲃ· ⲁⲥⲣ̅ⲭⲁⲣⲓⲍⲉ ⲛ̅ⲛ̅ⲇⲁⲓⲙⲱⲛ <text:line-break/><text:span text:style-name="T1"> </text:span><text:span text:style-name="T2">(27/25) </text:span> ⲙ̅ⲛ̅ ⲛ̅ⲧⲏⲟⲩ ⲛ̅ⲟⲩⲥⲓⲟⲩ ⲙ̅ⲡⲟⲩⲁ‐ <text:line-break/><text:span text:style-name="T1"> </text:span><text:span text:style-name="T2">(27/26) </text:span> ⲡⲟⲩⲁ· ⲭⲱⲣⲓⲥ ⲧⲏⲩ ⲅⲁⲣ ϩ̅ⲓ̅ ⲥⲓⲟⲩ <text:line-break/><text:span text:style-name="T1"> </text:span><text:span text:style-name="T2">(27/27) </text:span> ⲙ̅ⲙ̅ⲛ̅ ⲗⲁⲁⲩ ⲛⲁϣⲱⲡⲉ ϩ̅ⲓ̅ϫ̅ⲙ̅ ⲡⲕⲁϩ· <text:line-break/><text:span text:style-name="T1"> </text:span><text:span text:style-name="T2">(27/28) </text:span> ⲧⲇⲩⲛⲁⲙⲓⲥ ⲅⲁⲣ ⲛⲓⲙ ⲉϥⲙⲟⲩϩ <text:line-break/><text:span text:style-name="T1"> </text:span><text:span text:style-name="T2">(27/29) </text:span> ⲉⲃⲟⲗ ϩ̅ⲓ̅ⲧⲟⲟⲧⲟⲩ· ⲉⲡⲉⲓ ⲛ̅ⲧⲁⲩ <text:line-break/><text:span text:style-name="T1"> </text:span><text:span text:style-name="T2">(27/30) </text:span> ⲕⲁⲁⲩ ⲉⲃⲟⲗ ϩ̅ⲙ̅ ⲡⲕⲁⲕⲉ ⲙ̅ⲛ̅ ⲡⲕⲱ‐ <text:line-break/><text:span text:style-name="T1"> </text:span><text:span text:style-name="T2">(27/31) </text:span> ϩ̅ⲧ̅’̅· ⲙ̅ⲛ̅ ⲧϭⲟⲙ· ⲙ̅ⲛ̅ ⲡⲟⲩⲟⲉⲓⲛ· <text:line-break/><text:span text:style-name="T1"> </text:span><text:span text:style-name="T2">(27/32) </text:span> ⲡⲙⲁ ⲅⲁⲣ ⲛ̅ⲧⲁⲡⲟⲩⲕⲁⲕⲉ ⲙ̅ⲛ̅ <text:line-break/><text:span text:style-name="T1"> </text:span><text:span text:style-name="T2">(27/33) </text:span> ⲡⲟⲩⲕⲱϩ̅ⲧ̅’̅ ⲧⲱϩ ⲙ̅ⲛ̅ ⲛⲉⲩⲉⲣⲏⲩ <text:line-break/><text:span text:style-name="T1"> </text:span><text:span text:style-name="T2">(27/34) </text:span> ⲁⲩϫⲡⲟ ⲛ̅ϩⲉⲛⲑⲏⲣⲓⲟⲛ· ⲁⲩⲱ ⲡⲙⲁ <text:line-break/><text:span text:style-name="T1"> </text:span><text:span text:style-name="T2">(27/35) </text:span> ⲙ̅ⲡⲕⲁⲕⲉ ⲙ̅ⲛ̅ ⲡⲕⲱϩ̅ⲧ’̅ ⲙ̅ⲛ̅ ⲧⲇⲩⲛⲁ‐ <text:line-break/><text:span text:style-name="T1"> </text:span><text:span text:style-name="T2">(28/1) </text:span> ⲙⲓⲥ ⲙ̅ⲡⲛⲟⲩⲥ ⲙ̅ⲛ̅ ⲡⲟⲩⲟⲉⲓⲛ̣ [ⲛ̅]‐ <text:line-break/><text:span text:style-name="T1"> </text:span><text:span text:style-name="T2">(28/2) </text:span> ⲧⲁⲛ̅ⲣⲱⲙⲉ ϣⲱⲡⲉ· ⲉⲃⲟⲗ ϩ̅ⲙ̅ ⲡ̅‐ <text:line-break/><text:span text:style-name="T1"> </text:span><text:span text:style-name="T2">(28/3) </text:span> ⲡ̅ⲛ̅ⲁ̅ ⲡⲙⲉⲉⲩⲉ ⲙ̅ⲡⲟⲩⲟⲉⲓⲛ ⲡⲁⲃⲁⲗ <text:line-break/><text:span text:style-name="T1"> </text:span><text:span text:style-name="T2">(28/4) </text:span> ϥϣⲟⲟⲡ ⲁⲛ ϩ̅ⲛ̅ ⲣⲱⲙⲉ ⲛⲓⲙ· ϩⲁⲧⲉ <text:line-break/><text:span text:style-name="T1"> </text:span><text:span text:style-name="T2">(28/5) </text:span> ϩⲏ ⲅⲁⲣ ⲉⲙⲡⲁⲧⲉⲡⲕⲁⲧⲁⲕⲗⲩⲥⲙⲟⲥ <text:line-break/><text:span text:style-name="T1"> </text:span><text:span text:style-name="T2">(28/6) </text:span> ϣⲱⲡⲉ ⲉⲃⲟⲗ ϩ̅ⲛ̅ ⲛ̅ⲧⲏⲟⲩ ⲙ̅ⲛ̅ ⲛ̅‐ <text:line-break/><text:span text:style-name="T1"> </text:span><text:span text:style-name="T2">(28/7) </text:span> ⲇⲁⲓⲙⲱⲛ ⲁϩⲟⲟⲩ ϣⲱⲡⲉ ⲛ̅ⲛ̅‐ <text:line-break/><text:span text:style-name="T1"> </text:span><text:span text:style-name="T2">(28/8) </text:span> ⲣⲱⲙⲉ· ϫⲉⲕⲁⲁⲥ ⲇⲉ ⲁⲓⲧⲓ ⲉⲩⲛⲁ‐ <text:line-break/><text:span text:style-name="T1"> </text:span><text:span text:style-name="T2">(28/9) </text:span> ϫⲡⲟ ⲛ̅ⲧⲇⲩⲛⲁⲙⲓⲥ ⲧⲉⲧ’ϩ̅ⲙ̅ ⲡ̅ⲡⲩⲣ‐ <text:line-break/><text:span text:style-name="T1"> </text:span><text:span text:style-name="T2">(28/10) </text:span> ⲅⲟⲥ ⲛ̅ⲥ̅ⲙ̅ⲧⲟⲛ ⲙ̅ⲙⲟⲥ ϩ̅ⲓ̅ϫ̅ⲙ̅ ⲡⲕⲁϩ· <text:line-break/><text:span text:style-name="T1"> </text:span><text:span text:style-name="T2">(28/11) </text:span> ⲧⲟⲧⲉ ⲧⲫⲩⲥⲓⲥ ⲛ̅ⲧⲁⲩϣ̅ⲣ̅ϣⲱⲣ̅ⲥ̅· <text:line-break/><text:span text:style-name="T1"> </text:span><text:span text:style-name="T2">(28/12) </text:span> ⲁⲥⲟⲩⲱϣ ⲉⲣ̅ⲃⲗⲁⲡⲧⲓ ⲙ̅ⲡⲥⲡⲉⲣ‐ <text:line-break/><text:span text:style-name="T1"> </text:span><text:span text:style-name="T2">(28/13) </text:span> ⲙⲁ ⲉⲧⲛⲁϣⲱⲡⲉ ϩ̅ⲓ̅ϫ̅ⲙ̅ ⲡⲕⲁϩ ⲙ̅‐ <text:line-break/><text:span text:style-name="T1"> </text:span><text:span text:style-name="T2">(28/14) </text:span> ⲙ̅ⲛ̅ⲛ̅ⲥⲁ ⲡⲕⲁⲧⲁⲕⲗⲩⲥⲙⲟⲥ· ⲁⲩϫⲟ‐ <text:line-break/><text:span text:style-name="T1"> </text:span><text:span text:style-name="T2">(28/15) </text:span> ⲟⲩ ⲛ̅ϩⲉⲛⲇⲁⲓⲙⲱⲛ ϣⲁⲣⲟⲟⲩ ⲙ̅ⲛ̅ <text:line-break/><text:span text:style-name="T1"> </text:span><text:span text:style-name="T2">(28/16) </text:span> ⲛ ⲟⲩⲡⲗⲁⲛⲏ ⲛ̅ⲧⲉ ⲛ̅ⲧⲏⲟⲩ· ⲁⲩⲱ <text:line-break/><text:span text:style-name="T1"> </text:span><text:span text:style-name="T2">(28/17) </text:span> ⲟⲩⲃⲁⲣⲟⲥ ⲛ̅ⲧⲉ ⲛ̅ⲁⲅⲅⲉⲗⲟⲥ· ⲁⲩⲱ <text:line-break/><text:span text:style-name="T1"> </text:span><text:span text:style-name="T2">(28/18) </text:span> ⲟⲩϩ̅ⲣ̅ⲧⲉ ⲙ̅ⲡⲣⲟⲫⲏⲧⲏⲥ· ⲟⲩⲕⲁ‐ <text:line-break/><text:soft-page-break/><text:span text:style-name="T1"> </text:span><text:span text:style-name="T2">(28/19) </text:span> ⲧⲁⲅⲛⲱⲥⲓⲥ ⲛ̅ϣⲁϫⲉ· ϣⲓⲛⲁ ⲉⲉⲓ‐ <text:line-break/><text:span text:style-name="T1"> </text:span><text:span text:style-name="T2">(28/20) </text:span> ⲛⲁⲧⲥⲉⲃⲁⲕ ⲱ̅ ⲥ̅ⲏ̅ⲉ̅ⲙ̅· ϫⲉ ⲉⲃⲟⲗ <text:line-break/><text:span text:style-name="T1"> </text:span><text:span text:style-name="T2">(28/21) </text:span> ϩ̅ⲛ̅ ⲁϣ ⲛ̅ⲙ̅ⲛⲧ’̅ⲃ̅ⲗ̅ⲗⲉ ⲉⲩϩⲁⲣⲉϩ ⲉ‐ <text:line-break/><text:span text:style-name="T1"> </text:span><text:span text:style-name="T2">(28/22) </text:span> ⲧⲉⲕⲅⲉⲛⲉⲁ· ϩⲟⲧⲁⲛ ⲉⲓ̈ϣⲁⲛⲟⲩ <text:line-break/><text:span text:style-name="T1"> </text:span><text:span text:style-name="T2">(28/23) </text:span> ⲱⲛ̅ϩ̅ ⲉⲃⲟⲗ ⲛⲁⲕ ⲙ̅ⲡⲉⲛⲧⲁⲩϫⲟ <text:line-break/><text:span text:style-name="T1"> </text:span><text:span text:style-name="T2">(28/24) </text:span> ⲟϥ ⲧⲏⲣ̅ϥ̅· ⲧⲟⲧⲉ ⲡⲇⲓⲕⲁⲓⲟⲥ ⲛⲁ‐ <text:line-break/><text:span text:style-name="T1"> </text:span><text:span text:style-name="T2">(28/25) </text:span> ⲡⲓⲣⲉ ⲉϫ̅ⲛ̅ ⲧⲕⲧⲓⲥⲓⲥ ⲙ̅ⲛ̅ ⲧⲁϩ̅ⲃ̅ⲥⲱ <text:line-break/><text:span text:style-name="T1"> </text:span><text:span text:style-name="T2">(28/26) </text:span> ⲁⲩⲱ ⲧⲟⲩϣⲏ ⲙ̅ⲛ̅ ⲡⲉϩⲟⲟⲩ ⲛⲁ‐ <text:line-break/><text:span text:style-name="T1"> </text:span><text:span text:style-name="T2">(28/27) </text:span> ⲡⲱϣⲉ· ϯⲛⲁⲡⲱⲧ’ ⲅⲁⲣ ⲉϩⲣⲁⲓ̈ ⲉⲧ’‐ <text:line-break/><text:span text:style-name="T1"> </text:span><text:span text:style-name="T2">(28/28) </text:span> ⲕⲧⲓⲥⲓⲥ ϫⲉⲕⲁⲁⲥ ⲉⲉⲓⲛⲁϥⲓ ⲡⲟⲩ‐ <text:line-break/><text:span text:style-name="T1"> </text:span><text:span text:style-name="T2">(28/29) </text:span> ⲟⲉⲓⲛ ⲙ̅ⲡⲙⲁ ⲉⲧ̅ⲙ̅ⲙⲁⲩ ⲡⲁⲓ̈ ⲉⲧⲉ‐ <text:line-break/><text:span text:style-name="T1"> </text:span><text:span text:style-name="T2">(28/30) </text:span> ⲟⲩⲛ̅ⲧⲁⲥ̅ϥ̅ ⲛ̅ϭⲓ ⲧⲡⲓⲥⲧⲓⲥ· ⲁⲩⲱ <text:line-break/><text:span text:style-name="T1"> </text:span><text:span text:style-name="T2">(28/31) </text:span> ϯⲛⲁⲟⲩⲱⲛ̅ϩ̅ ⲉⲃⲟⲗ ⲛ̅ⲛⲉⲧⲛⲁ‐ <text:line-break/><text:span text:style-name="T1"> </text:span><text:span text:style-name="T2">(28/32) </text:span> ϫⲡⲟ ⲛⲁⲩ ⲙ̅ⲡⲙⲉⲉⲩⲉ ⲙ̅ⲡⲟⲩ‐ <text:line-break/><text:span text:style-name="T1"> </text:span><text:span text:style-name="T2">(28/33) </text:span> ⲟⲉⲓⲛ ⲙ̅ⲡ̅ⲛ̅ⲁ̅· ⲉⲧⲃⲏⲧⲟⲩ ⲅⲁⲣ ⲁⲡⲁ‐ <text:line-break/><text:span text:style-name="T1"> </text:span><text:span text:style-name="T2">(28/34) </text:span> ⲙⲉⲅⲉⲑⲟⲥ ⲟⲩⲱⲛ̅ϩ̅ ⲉⲃⲟⲗ· ϩⲟⲧⲁⲛ <text:line-break/><text:span text:style-name="T1"> </text:span><text:span text:style-name="T2">(28/35) </text:span> ⲉϥϣⲁⲛⲟⲩⲱⲛ̅ϩ̅ ⲉⲃⲟⲗ ⲱ ⲥⲏⲉⲙ <text:line-break/><text:span text:style-name="T1"> </text:span><text:span text:style-name="T2">(28/36) </text:span> ϩ̅ⲓ̅ϫ̅ⲙ̅ ⲡⲕⲁϩ̣ [ϩ̅ⲙ̅] ⲡⲙⲁ ⲉⲧⲟⲩⲛⲁ <text:line-break/><text:span text:style-name="T1"> </text:span><text:span text:style-name="T2">(29/1) </text:span> ⲙⲟⲩⲧⲉ ⲉⲣⲟϥ ϫⲉ ⲥⲟⲇⲟⲙⲁ· ⲉⲣⲓ‐ <text:line-break/><text:span text:style-name="T1"> </text:span><text:span text:style-name="T2">(29/2) </text:span> ⲁⲥⲫⲁⲗⲓⲍⲉ ⲛ̅ⲧⲉⲥⲑⲏⲥⲓⲥ ⲉϯ‐ <text:line-break/><text:span text:style-name="T1"> </text:span><text:span text:style-name="T2">(29/3) </text:span> ⲛⲁⲧⲁⲁⲥ ⲛⲁⲕ· ⲥⲉⲛⲁⲥⲱⲟⲩϩ <text:line-break/><text:span text:style-name="T1"> </text:span><text:span text:style-name="T2">(29/4) </text:span> ⲅⲁⲣ ⲉⲣⲟⲕ ⲛ̅ϭⲓ ⲛⲉⲧⲉⲩⲛ̅ⲧⲁⲩ <text:line-break/><text:span text:style-name="T1"> </text:span><text:span text:style-name="T2">(29/5) </text:span> ⲙ̅ⲙⲁⲩ ⲙ̅ⲫⲏⲧ’ ⲉⲧⲟⲩⲁⲁⲃ· ⲉ‐ <text:line-break/><text:span text:style-name="T1"> </text:span><text:span text:style-name="T2">(29/6) </text:span> ⲧⲃⲉ ⲡⲗⲟⲅⲟⲥ ⲡⲁⲓ̈ ⲉⲧ̅ⲕ̅ⲛⲁⲟⲩ <text:line-break/><text:span text:style-name="T1"> </text:span><text:span text:style-name="T2">(29/7) </text:span> ⲟⲛϩ̅ϥ̅ ⲉⲃⲟⲗ· ⲉⲕϣⲁⲛⲟⲩⲱⲛ̅ϩ̅ <text:line-break/><text:span text:style-name="T1"> </text:span><text:span text:style-name="T2">(29/8) </text:span> ⲅⲁⲣ ⲉⲃⲟⲗ ϩ̅ⲛ̅ ⲧⲕⲧⲓⲥⲓⲥ· ⲧⲫⲩⲥⲓⲥ <text:line-break/><text:span text:style-name="T1"> </text:span><text:span text:style-name="T2">(29/9) </text:span> ⲛ̅ⲕⲁⲕⲉ ⲛⲁⲛⲟⲉⲓⲛ ⲉϩⲣⲁⲓ̈ ⲉϫⲱⲕ <text:line-break/><text:span text:style-name="T1"> </text:span><text:span text:style-name="T2">(29/10) </text:span> ⲙ̅ⲛ̅ ⲛ̅ⲧⲏⲩ ⲙ̅ⲛ̅ⲛ ⲟⲩⲇⲁⲓⲙⲱⲛ· <text:line-break/><text:span text:style-name="T1"> </text:span><text:span text:style-name="T2">(29/11) </text:span> ϣⲓⲛⲁ ⲉⲩⲛⲁϥⲱⲧⲉ ⲉⲃⲟⲗ ⲛ̅‐ <text:line-break/><text:span text:style-name="T1"> </text:span><text:span text:style-name="T2">(29/12) </text:span> ⲧⲉⲥⲑⲏⲥⲓⲥ· ⲛ̅ⲧⲟⲕ ⲇⲉ ⲧⲁϣⲉ‐ <text:line-break/><text:span text:style-name="T1"> </text:span><text:span text:style-name="T2">(29/13) </text:span> ⲟⲉⲓϣ ⲛ̅ϭⲗⲟⲙ ⲛ̅ⲛ̅ⲥⲟⲇⲟⲙⲓⲧⲏⲥ <text:line-break/><text:span text:style-name="T1"> </text:span><text:span text:style-name="T2">(29/14) </text:span> ⲛ̅ⲧⲉⲕⲥⲃⲱ ⲛ̅ⲕⲁⲑⲟⲗⲓⲕⲏ· ⲛⲉⲕ‐ <text:line-break/><text:span text:style-name="T1"> </text:span><text:span text:style-name="T2">(29/15) </text:span> ⲙⲉⲗⲟⲥ ⲅⲁⲣ ⲛⲉ· ϥⲛⲁⲡⲱⲣ̅ϫ̅ <text:line-break/><text:span text:style-name="T1"> </text:span><text:span text:style-name="T2">(29/16) </text:span> ⲅⲁⲣ ⲉⲃⲟⲗ ⲙ̅ⲡⲙⲁ ⲉⲧ̅ⲙ̅ⲙⲁⲩ ⲛ̅ϭⲓ <text:line-break/><text:span text:style-name="T1"> </text:span><text:span text:style-name="T2">(29/17) </text:span> ⲡⲇⲁⲓⲙⲱⲛ ⲙ̅ⲙⲟⲣⲫⲏ ⲛ̅ⲣⲱⲙⲉ <text:line-break/><text:span text:style-name="T1"> </text:span><text:span text:style-name="T2">(29/18) </text:span> ⲉϥⲉ ⲛ̅ⲁⲧⲥⲟⲟⲩⲛ ϩ̅ⲙ̅ ⲡⲁⲟⲩⲱϣ· <text:line-break/><text:span text:style-name="T1"> </text:span><text:span text:style-name="T2">(29/19) </text:span> ϥⲛⲁϩⲁⲣ̣ⲉϩ ⲉⲧⲉⲓ̈ⲫⲁⲥⲓⲥ· ⲛ̅ⲥⲟⲇⲟ‐ <text:line-break/><text:span text:style-name="T1"> </text:span><text:span text:style-name="T2">(29/20) </text:span> ⲙⲓⲧⲏⲥ ⲇⲉ ⲕⲁⲧⲁ ⲡⲟⲩⲱϣ ⲙ̅ⲡⲙⲉ‐ <text:line-break/><text:span text:style-name="T1"> </text:span><text:span text:style-name="T2">(29/21) </text:span> ⲅⲉⲑⲟⲥ ⲥⲉⲛⲁⲣ̅ⲙⲁⲣⲧⲩⲣⲓ ⲛ̅ⲧ̅’̅‐ <text:line-break/><text:span text:style-name="T1"> </text:span><text:span text:style-name="T2">(29/22) </text:span> ⲙⲁⲣⲧⲩⲣⲓⲁ ⲛ̅ⲕⲁⲑⲟⲗⲓⲕⲏ· ⲥⲉ‐ <text:line-break/><text:span text:style-name="T1"> </text:span><text:span text:style-name="T2">(29/23) </text:span> ⲛⲁⲙ̅ⲧⲟⲛ ⲙ̅ⲙⲟⲟⲩ ϩ̅ⲛ̅ ⲟⲩⲥⲩⲛ‐ <text:line-break/><text:span text:style-name="T1"> </text:span><text:span text:style-name="T2">(29/24) </text:span> ⲉⲓⲇⲏⲥⲓⲥ ⲉⲥⲟⲩⲁⲁⲃ̓ ϩ̅ⲙ̅ ⲡⲧⲟ‐ <text:line-break/><text:span text:style-name="T1"> </text:span><text:span text:style-name="T2">(29/25) </text:span> ⲡⲟⲥ ⲛ̅ⲧⲟⲩⲁⲛⲁⲡⲁⲩⲥⲓⲥ ⲉⲧⲉ‐ <text:line-break/><text:span text:style-name="T1"> </text:span><text:span text:style-name="T2">(29/26) </text:span> ⲡⲁⲓ̈ ⲡⲉ ⲡ̅ⲛ̅ⲁ̅ ⲛ̅ⲁⲅⲉⲛⲛⲏⲧⲟⲛ· <text:line-break/><text:span text:style-name="T1"> </text:span><text:span text:style-name="T2">(29/27) </text:span> ⲛⲁⲓ̈ ⲇⲉ ϩⲱⲥ ⲉⲩⲛⲁϣⲱⲡⲉ ⲥⲉ‐ <text:line-break/><text:span text:style-name="T1"> </text:span><text:span text:style-name="T2">(29/28) </text:span> ⲛⲁⲣⲱⲕ̅ϩ̅ ⲛ̅ⲥⲟⲇⲟⲙⲁ ⲁⲇⲓⲕⲱⲥ· <text:line-break/><text:span text:style-name="T1"> </text:span><text:span text:style-name="T2">(29/29) </text:span> ⲉⲃⲟⲗ ϩ̅ⲛ̅ⲛ ⲟⲩⲫⲩⲥⲓⲥ ⲙ̅ⲡⲟⲛⲏ‐ <text:line-break/><text:soft-page-break/><text:span text:style-name="T1"> </text:span><text:span text:style-name="T2">(29/30) </text:span> ⲣⲁ· ⲡⲕⲁⲕⲟⲛ ⲅⲁⲣ ϥⲛⲁⲣ̅ⲁⲛⲁ <text:line-break/><text:span text:style-name="T1"> </text:span><text:span text:style-name="T2">(29/31) </text:span> ⲡⲁⲩⲉⲥⲑⲁⲓ ⲁⲛ ϫⲉ ⲉⲡⲉⲕ <text:line-break/><text:span text:style-name="T1"> </text:span><text:span text:style-name="T2">(29/32) </text:span> ⲙⲉⲅⲉⲑⲟⲥ ⲛⲁⲟⲩⲱⲛ̅ϩ̅ ⲉⲃⲟⲗ <text:line-break/><text:span text:style-name="T1"> </text:span><text:span text:style-name="T2">(29/33) </text:span> ⲙ̅ⲡⲙⲁ ⲉⲧ̅ⲙ̅ⲙ̣ⲁⲩ· ⲧⲟⲧⲉ <text:line-break/><text:span text:style-name="T1"> </text:span><text:span text:style-name="T2">(30/1) </text:span> ϥⲛⲁⲃⲱⲕ ⲛ̅ϭⲓ ⲡⲇⲁⲓⲙⲱⲛ ⲙ̅ⲛ̣̅̅ <text:line-break/><text:span text:style-name="T1"> </text:span><text:span text:style-name="T2">(30/2) </text:span> ⲧⲡⲓⲥⲧⲓⲥ· ⲁⲩⲱ ⲧⲟⲧⲉ ϥⲛⲁⲟⲩ‐ <text:line-break/><text:span text:style-name="T1"> </text:span><text:span text:style-name="T2">(30/3) </text:span> ⲱⲛ̅ϩ̅ ⲉⲃⲟⲗ ϩ̅ⲙ̅ ⲡϥⲧⲟⲟⲩ ⲙ̅ⲙⲉ‐ <text:line-break/><text:span text:style-name="T1"> </text:span><text:span text:style-name="T2">(30/4) </text:span> ⲣⲟⲥ ⲛ̅ⲧⲉ ⲧⲕⲧⲓⲥⲓⲥ· ϩⲟⲧⲁⲛ ⲇⲉ‐ <text:line-break/><text:span text:style-name="T1"> </text:span><text:span text:style-name="T2">(30/5) </text:span> ⲉⲣϣⲁⲛⲧⲡⲓⲥⲧⲟⲥ ⲟⲩⲱⲛ̅ϩ̅ ⲉⲃⲟⲗ <text:line-break/><text:span text:style-name="T1"> </text:span><text:span text:style-name="T2">(30/6) </text:span> ϩ̅ⲙ̅ ⲫⲁⲉ ⲛ̅ⲉⲓⲛⲉ· ⲧⲟⲧⲉ ϥⲛⲁⲣ̅‐ <text:line-break/><text:span text:style-name="T1"> </text:span><text:span text:style-name="T2">(30/7) </text:span> ⲫⲁⲛⲉⲣⲟⲩ ⲛ̅ϭⲓ ⲡⲉⲥⲟⲩⲱⲛ̅ϩ̅ ⲉⲃⲟⲗ· <text:line-break/><text:span text:style-name="T1"> </text:span><text:span text:style-name="T2">(30/8) </text:span> ⲡϣⲟⲣ̅ⲡ̅ ⲅⲁⲣ ⲛ̅ϫⲡⲟ ⲡⲉ ⲡⲇⲁⲓⲙⲱⲛ· <text:line-break/><text:span text:style-name="T1"> </text:span><text:span text:style-name="T2">(30/9) </text:span> ⲡⲉⲣⲟⲩⲱⲛ̅ϩ̅ ⲉⲃⲟⲗ ϩ̅ⲛ̅ ⲑⲁⲣⲙⲟⲛⲓⲁ <text:line-break/><text:span text:style-name="T1"> </text:span><text:span text:style-name="T2">(30/10) </text:span> ⲛ̅ⲧⲉ ⲧⲫⲩⲥⲓⲥ ϩ̅ⲛ̅ ϩⲁϩ ⲙ̅ⲡⲣⲟⲥⲱ‐ <text:line-break/><text:span text:style-name="T1"> </text:span><text:span text:style-name="T2">(30/11) </text:span> ⲡⲟⲛ· ϣⲓⲛⲁ ⲉⲣⲉⲧⲡⲓⲥⲧⲓⲥ ⲛⲁ‐ <text:line-break/><text:span text:style-name="T1"> </text:span><text:span text:style-name="T2">(30/12) </text:span> ⲟⲩⲱⲛ̅ϩ̅ ⲉⲃⲟⲗ ⲛ̅ϩⲏⲧ̅ϥ̅· ⲉϥϣⲁⲛ‐ <text:line-break/><text:span text:style-name="T1"> </text:span><text:span text:style-name="T2">(30/13) </text:span> ⲟⲩⲱⲛ̅ϩ̅ ⲅⲁⲣ ⲉⲃⲟⲗ ϩ̅ⲛ̅ ⲧⲕⲧⲓⲥⲓⲥ <text:line-break/><text:span text:style-name="T1"> </text:span><text:span text:style-name="T2">(30/14) </text:span> ⲥⲉⲛⲁϣⲱⲡⲉ ⲛ̅ϭⲓ ϩⲉⲛⲟⲣⲅⲏ ⲉⲩ‐ <text:line-break/><text:span text:style-name="T1"> </text:span><text:span text:style-name="T2">(30/15) </text:span> ϩⲟⲟⲩ ⲙ̅ⲛ̅ ϩⲉⲛⲛⲟⲉⲓⲛ ⲙ̅ⲛ̅ ϩⲉⲛ <text:line-break/><text:span text:style-name="T1"> </text:span><text:span text:style-name="T2">(30/16) </text:span> ⲡⲟⲗⲉⲙⲟⲥ· ⲙ̅ⲛ̅ ϩ̅ⲛ̅ϩⲕⲟ· ⲙ̅ⲛ̅ ϩⲉⲛ <text:line-break/><text:span text:style-name="T1"> </text:span><text:span text:style-name="T2">(30/17) </text:span> ⲟⲩⲁ· ⲉⲧⲃⲏⲏⲧ̅ϥ̅ ⲅⲁⲣ ⲧⲟⲓⲕⲟⲩⲙⲉ <text:line-break/><text:span text:style-name="T1"> </text:span><text:span text:style-name="T2">(30/18) </text:span> ⲛⲏ ⲧⲏⲣ̅ⲥ̅ ⲥⲉⲛⲁϣ̅ⲣ̅ϣⲱⲣ̅ⲥ̅· <text:line-break/><text:span text:style-name="T1"> </text:span><text:span text:style-name="T2">(30/19) </text:span> ϥⲛⲁⲕⲱⲧⲉ ⲅⲁⲣ ⲛ̅ⲥⲁ ⲧⲇⲩⲛⲁⲙⲓⲥ <text:line-break/><text:span text:style-name="T1"> </text:span><text:span text:style-name="T2">(30/20) </text:span> ⲛ̅ⲧⲡⲓⲥⲧⲓⲥ ⲙ̅ⲛ̅ ⲡⲟⲩⲟⲉⲓⲛ ϥⲛⲁ‐ <text:line-break/><text:span text:style-name="T1"> </text:span><text:span text:style-name="T2">(30/21) </text:span> ϩⲉ ⲉⲣⲟⲥ ⲁⲛ· ϩ̅ⲙ̅ ⲡⲕⲉⲣⲟⲥ ⲅⲁⲣ <text:line-break/><text:span text:style-name="T1"> </text:span><text:span text:style-name="T2">(30/22) </text:span> ⲉⲧ̅ⲙ̅ⲙⲁⲩ ϥⲛⲁⲟⲩⲱⲛ̅ϩ̅ ⲉⲃⲟⲗ ⲛ̅‐ <text:line-break/><text:span text:style-name="T1"> </text:span><text:span text:style-name="T2">(30/23) </text:span> ϭⲓ ⲡⲕⲉⲇⲁⲓⲙⲱⲛ ϩ̅ⲓ̅ϫ̅ⲙ̅ ⲡⲓⲉⲣⲟ· <text:line-break/><text:span text:style-name="T1"> </text:span><text:span text:style-name="T2">(30/24) </text:span> ϣⲓⲛⲁ ⲉϥⲛⲁⲣ̅ⲃⲁⲡⲧⲓⲍⲉ ⲛ̅ⲛⲟⲩ‐ <text:line-break/><text:span text:style-name="T1"> </text:span><text:span text:style-name="T2">(30/25) </text:span> ⲃⲁⲡⲧⲓⲥⲙⲁ ⲛ̅ⲁⲧ’ϫⲱⲕ ⲉⲃⲟⲗ· <text:line-break/><text:span text:style-name="T1"> </text:span><text:span text:style-name="T2">(30/26) </text:span> ⲛ̅ϥ̅ⲕⲓⲙ ⲉⲡⲕⲟⲥⲙⲟⲥ ϩ̅ⲛ̅ ⲟⲩⲙ̅ⲣ̅‐ <text:line-break/><text:span text:style-name="T1"> </text:span><text:span text:style-name="T2">(30/27) </text:span> ⲣⲉ ⲙ̅ⲙⲟⲟⲩ· ⲁⲛⲟⲕ ⲇⲉ ⲡϩⲁⲙ <text:line-break/><text:span text:style-name="T1"> </text:span><text:span text:style-name="T2">(30/28) </text:span> ⲧⲣⲁⲟⲩⲱⲛ̅ϩ̅ ⲉⲃⲟⲗ ⲡⲉ ϩ̅ⲛ̅ ⲙ̅ⲙⲉⲗⲟⲥ <text:line-break/><text:span text:style-name="T1"> </text:span><text:span text:style-name="T2">(30/29) </text:span> ⲙ̅ⲡⲙⲉⲉⲩⲉ ⲛ̅ⲧⲡⲓⲥⲧⲓⲥ· ϣⲓⲛⲁ <text:line-break/><text:span text:style-name="T1"> </text:span><text:span text:style-name="T2">(30/30) </text:span> ⲉⲓ̈ⲛⲁⲫⲁⲛⲉⲣⲟⲩ ⲛ̅ⲛ̅ⲛⲟϭ ⲛ̅ⲧⲁ‐ <text:line-break/><text:span text:style-name="T1"> </text:span><text:span text:style-name="T2">(30/31) </text:span> ⲇⲩⲛⲁⲙⲓⲥ· ϯⲛⲁⲡⲟⲣϣ̅ϥ̅ ⲉⲃⲟⲗ <text:line-break/><text:span text:style-name="T1"> </text:span><text:span text:style-name="T2">(30/32) </text:span> ϩ̅ⲙ̅ ⲡⲇⲁⲓⲙⲱⲛ· ⲉⲧⲉ ⲡⲁⲓ̈ ⲡⲉ ⲥⲟⲗ‐ <text:line-break/><text:span text:style-name="T1"> </text:span><text:span text:style-name="T2">(30/33) </text:span> ⲇⲁⲥ· ⲁⲩⲱ ⲡⲟⲩⲟⲉⲓⲛ ⲉⲧⲉ ⲟⲩ‐ <text:line-break/><text:span text:style-name="T1"> </text:span><text:span text:style-name="T2">(30/34) </text:span> ⲛ̅ⲧⲁϥ ⲉⲃⲟⲗ ϩ̅ⲙ̅ ⲡ̅ⲛⲁ̅· ϯⲛⲁⲧⲁ‐ <text:line-break/><text:span text:style-name="T1"> </text:span><text:span text:style-name="T2">(30/35) </text:span> ϩ̅ϥ̅ ⲙ̅ⲛ̅ ⲧⲁϩ̅ⲃ̅ⲥⲱ ⲉⲙⲁⲩϫⲣⲟ ⲉ‐ <text:line-break/><text:span text:style-name="T1"> </text:span><text:span text:style-name="T2">(30/36) </text:span> ⲣⲟⲥ· ⲁ̣ⲩⲱ̣ ⲡⲉ̣ϯⲛⲁⲟⲩⲱⲛϩ̅ϥ̅ ⲉ‐ <text:line-break/><text:span text:style-name="T1"> </text:span><text:span text:style-name="T2">(31/1) </text:span> ⲃⲟⲗ· ϩⲣⲁⲓ̈ ϩ̅ⲙ̅ ⲡⲕⲁⲕⲉ ⲉⲧⲃⲏⲧ̅ⲕ̅ <text:line-break/><text:span text:style-name="T1"> </text:span><text:span text:style-name="T2">(31/2) </text:span> ⲁⲩⲱ ⲉⲧⲃⲉ ⲧⲉⲕⲅⲉⲛⲉⲁ· ⲧⲁⲓ̈ ⲉ‐ <text:line-break/><text:span text:style-name="T1"> </text:span><text:span text:style-name="T2">(31/3) </text:span> ⲧⲟⲩⲛⲁϩⲁⲣⲉϩ ⲉⲣⲟⲥ ⲉⲡⲕⲁⲕⲟⲛ <text:line-break/><text:span text:style-name="T1"> </text:span><text:span text:style-name="T2">(31/4) </text:span> ⲛ̅ⲕⲁⲕⲉ· ⲉⲓⲙⲉ ⲱ̅ ⲥ̅ⲏ̅ⲉ̅ⲙ̅ ϫⲉ ⲭⲱ‐ <text:line-break/><text:span text:style-name="T1"> </text:span><text:span text:style-name="T2">(31/5) </text:span> ⲣⲓⲥ ⲉⲗ̅ⲱ̅ⲣ̅ⲭ̅ⲁ̅ⲓ̅ⲟ̅ⲥ̅ ⲙ̅ⲛ̅ ⲁ̅ⲙⲟⲓⲁⲥ̅ ⲙ̅ⲛ̅ <text:line-break/><text:span text:style-name="T1"> </text:span><text:span text:style-name="T2">(31/6) </text:span> ⲥ̅ⲧ̅ⲣ̅ⲟ̅ⲫ̅ⲁ̅ⲓ̅ⲁ̅ⲥ̅· ⲙ̅ⲛ̅ ⲭⲉ̅ⲗⲕⲉⲁⲕ̅· <text:line-break/><text:span text:style-name="T1"> </text:span><text:span text:style-name="T2">(31/7) </text:span> ⲙ̅ⲛ̅ ⲭ̅ⲉⲗⲕⲉⲁ̅· ⲙ̅ⲛ̅ ⲁ̅ⲓⲗⲉⲟⲩ̅· ⲙ̅ⲛ̅ <text:line-break/><text:soft-page-break/><text:span text:style-name="T1"> </text:span><text:span text:style-name="T2">(31/8) </text:span> ⲗⲁⲁⲩ ⲛⲁϣϫⲱⲃⲉ ⲛ̅ⲧⲉⲓ̈ⲑⲉⲥⲓⲥ <text:line-break/><text:span text:style-name="T1"> </text:span><text:span text:style-name="T2">(31/9) </text:span> ⲉⲑⲟⲟⲩ· ⲧⲁⲓ̈ ⲅⲁⲣ ⲧⲉ ⲧⲁϩⲩⲡⲟ <text:line-break/><text:span text:style-name="T1"> </text:span><text:span text:style-name="T2">(31/10) </text:span> ⲙⲛⲏⲥⲓⲥ· ϫⲉ ϩⲣⲁⲓ̈ ⲛ̅ϩⲏⲧ̅ⲥ̅ ⲁⲉⲓ‐ <text:line-break/><text:span text:style-name="T1"> </text:span><text:span text:style-name="T2">(31/11) </text:span> ϫⲣⲟ ⲉⲧ’ⲑⲉⲥⲓⲥ ⲉⲧ’ϩⲟⲟⲩ· ⲁⲩⲱ <text:line-break/><text:span text:style-name="T1"> </text:span><text:span text:style-name="T2">(31/12) </text:span> ⲁⲉⲓϥⲓ ⲙ̅ⲡⲟⲩⲟⲉⲓⲛ ⲙ̅ⲡ̅ⲡ̅ⲛⲁ̅ ⲉⲃⲟⲗ <text:line-break/><text:span text:style-name="T1"> </text:span><text:span text:style-name="T2">(31/13) </text:span> ϩ̅ⲙ̅ ⲡⲙⲟⲟⲩ ⲛ̅ϩ̅ⲣ̅ⲧⲉ· ϩⲟⲧⲁⲛ <text:line-break/><text:span text:style-name="T1"> </text:span><text:span text:style-name="T2">(31/14) </text:span> ⲅⲁⲣ ⲉⲩϣⲁⲛϩⲱⲛ ⲉϩⲟⲩⲛ ⲛ̅ϭⲓ <text:line-break/><text:span text:style-name="T1"> </text:span><text:span text:style-name="T2">(31/15) </text:span> ⲛ̅ϩⲟⲟⲩ ⲛ̅ⲧ̅’̅ⲡⲣⲟⲑⲉⲥⲙⲓⲁ ⲙ̅ⲡ̅‐ <text:line-break/><text:span text:style-name="T1"> </text:span><text:span text:style-name="T2">(31/16) </text:span> ⲇⲁⲓⲙⲱⲛ· ⲡⲁⲓ̈ ⲉⲧⲁⲣ̅ⲃⲁⲡⲧⲓⲍⲉ <text:line-break/><text:span text:style-name="T1"> </text:span><text:span text:style-name="T2">(31/17) </text:span> ϩ̅ⲛ̅ ⲟⲩⲡⲗⲁⲛⲏ· ⲧⲟⲧⲉ ϯⲛⲁⲟⲩ <text:line-break/><text:span text:style-name="T1"> </text:span><text:span text:style-name="T2">(31/18) </text:span> ⲱⲛ̅ϩ̅ ⲉⲃⲟⲗ ϩ̅ⲙ̅ ⲡⲃⲁⲡⲧⲓⲥⲙⲟⲥ <text:line-break/><text:span text:style-name="T1"> </text:span><text:span text:style-name="T2">(31/19) </text:span> ⲙ̅ⲡⲇⲁⲓⲙⲱⲛ· ϣⲓⲛⲁ ⲉⲉⲓⲛⲁⲫⲁ‐ <text:line-break/><text:span text:style-name="T1"> </text:span><text:span text:style-name="T2">(31/20) </text:span> ⲛⲉⲣⲟⲩ ϩ̅ⲛ̅ ⲧ̅’ⲧⲁⲡⲣⲟ ⲛ̅ⲧⲡⲓⲥ‐ <text:line-break/><text:span text:style-name="T1"> </text:span><text:span text:style-name="T2">(31/21) </text:span> ⲧⲓⲥ ⲛ̅ⲛⲟⲩⲙⲁⲣⲧⲩⲣⲓⲁ ⲛ̅ⲛⲉ‐ <text:line-break/><text:span text:style-name="T1"> </text:span><text:span text:style-name="T2">(31/22) </text:span> ⲧⲉ ⲛⲟⲩⲥ ⲛⲉ· ϯⲣ̅ ⲙ̅ⲛ̅ⲧⲣⲉ <text:line-break/><text:span text:style-name="T1"> </text:span><text:span text:style-name="T2">(31/23) </text:span> ⲙ̅ⲙⲟⲕ ⲥ̅ⲡ̅ⲓ̅ⲛ̅ⲑ̅ⲏ̅ⲣ̅ ⲡⲉⲧⲉⲙⲁϥ <text:line-break/><text:span text:style-name="T1"> </text:span><text:span text:style-name="T2">(31/24) </text:span> ⲱϣ̅ⲙ̅ ⲟ̅ⲥⲉⲓ̅· ⲡⲉⲧ’ⲥⲟⲧ̅ⲡ̅ ⲛ̅ⲧⲉ‐ <text:line-break/><text:span text:style-name="T1"> </text:span><text:span text:style-name="T2">(31/25) </text:span> ⲡⲟⲩⲟⲉⲓⲛ· ⲡⲃⲁⲗ ⲛ̅ⲧⲡⲉ· ⲁⲩⲱ <text:line-break/><text:span text:style-name="T1"> </text:span><text:span text:style-name="T2">(31/26) </text:span> ⲧⲡⲓⲥⲧⲓⲥ· ⲧϣⲟⲣ̅ⲡ̅ ⲙ̅ⲛ̅ ⲑⲁⲏ· <text:line-break/><text:span text:style-name="T1"> </text:span><text:span text:style-name="T2">(31/27) </text:span> ⲁⲩⲱ ⲥⲟⲫⲓⲁ· ⲙ̅ⲛ̅ ⲥⲁⲫⲁⲓⲁ· ⲙ̅ⲛ̅ <text:line-break/><text:span text:style-name="T1"> </text:span><text:span text:style-name="T2">(31/28) </text:span> ⲥⲁⲫⲁⲓⲛⲁ· ⲁⲩⲱ ⲡⲇⲓⲕⲁⲓⲟⲥ <text:line-break/><text:span text:style-name="T1"> </text:span><text:span text:style-name="T2">(31/29) </text:span> ⲛ̅ⲥⲡⲓⲛⲑⲏⲣ· ⲁⲩⲱ ⲡⲟⲩⲟ‐ <text:line-break/><text:span text:style-name="T1"> </text:span><text:span text:style-name="T2">(31/30) </text:span> ⲉⲓⲛ ⲉⲧ’ϫⲁϩ̅ⲙ̅· ⲁⲩⲱ ⲛ̅ⲧⲟ ⲧⲁ‐ <text:line-break/><text:span text:style-name="T1"> </text:span><text:span text:style-name="T2">(31/31) </text:span> ⲛⲁⲧⲟⲗⲏ ⲁⲩⲱ ⲫⲱⲧ̅ⲡ̅· ⲁⲩⲱ <text:line-break/><text:span text:style-name="T1"> </text:span><text:span text:style-name="T2">(31/32) </text:span> ⲧⲁⲣⲕⲧⲟⲥ· ⲙ̅ⲛ̅ ⲙⲉⲥⲏⲙⲃⲣⲓⲁ· <text:line-break/><text:span text:style-name="T1"> </text:span><text:span text:style-name="T2">(31/33) </text:span> ⲡⲉⲑⲏⲣ ⲙ̅ⲛ̅ ⲡⲁⲏⲣ· ⲙ̅ⲛ̅ ⲛ̅ⲇⲩ‐ <text:line-break/><text:span text:style-name="T1"> </text:span><text:span text:style-name="T2">(31/34) </text:span> ⲛⲁⲙⲓⲥ ⲧⲏⲣⲟⲩ ⲁⲩⲱ ⲛⲉⲝⲟⲩ‐ <text:line-break/><text:span text:style-name="T1"> </text:span><text:span text:style-name="T2">(31/35) </text:span> ⲥⲓⲁ· <text:line-break/><text:span text:style-name="T1"> </text:span><text:span text:style-name="T2">(32/1) </text:span> ⲛ̅ⲧⲱⲧ̅ⲛ̅ ⲧⲉⲧ̅ⲛ̅ϣⲟⲟⲡ ϩ̅ⲛ̅ ⲧ[ⲫⲩ]‐ <text:line-break/><text:span text:style-name="T1"> </text:span><text:span text:style-name="T2">(32/2) </text:span> ⲥⲓⲥ· ⲁⲩⲱ ⲛ̅ⲧⲟⲕ ⲙⲟ̅ⲗ̅ⲩ̅ⲭ̅ⲑ̅ⲁ̅ <text:line-break/><text:span text:style-name="T1"> </text:span><text:span text:style-name="T2">(32/3) </text:span> ⲙ̅ⲛ̅ ⲥ̅ⲱⲭ̅ ⲉⲃⲟⲗ ϩ̅ⲛ̅ ⲉⲣⲅⲟⲛ ⲛⲓⲙ· <text:line-break/><text:span text:style-name="T1"> </text:span><text:span text:style-name="T2">(32/4) </text:span> ⲁⲩⲱ ϩ̅ⲓ̅ⲥⲉ ⲛⲓⲙ ⲉϥϫⲁϩ̅ⲙ̅ ⲛ̅ⲧⲉ <text:line-break/><text:span text:style-name="T1"> </text:span><text:span text:style-name="T2">(32/5) </text:span> ⲧⲫⲩⲥⲓⲥ· ⲧⲟⲧⲉ ϯⲛ̅ⲛⲏⲩ ⲉⲃⲟⲗ <text:line-break/><text:span text:style-name="T1"> </text:span><text:span text:style-name="T2">(32/6) </text:span> ϩ̅ⲓ̅ⲧ̅ⲙ̅ ⲡⲇⲁⲓⲙⲱⲛ ⲉⲡⲓⲧ̅ⲛ̅ ⲉⲡⲙⲟ‐ <text:line-break/><text:span text:style-name="T1"> </text:span><text:span text:style-name="T2">(32/7) </text:span> ⲟⲩ· ⲁⲩⲱ ϩⲉⲛⲃⲉⲣⲱ ⲙ̅ⲙⲟⲟⲩ <text:line-break/><text:span text:style-name="T1"> </text:span><text:span text:style-name="T2">(32/8) </text:span> ⲙ̅ⲛ̅ ϩⲉⲛϣⲁϩ ⲛ̅ⲕⲱϩ̅ⲧ’̅ ⲥⲉⲛⲁⲧⲱ‐ <text:line-break/><text:span text:style-name="T1"> </text:span><text:span text:style-name="T2">(32/9) </text:span> ⲱⲛ ⲉϩⲣⲁⲓ̈ ⲉϫⲱⲉⲓ· ⲧⲟⲧⲉ ϯⲛ̅‐ <text:line-break/><text:span text:style-name="T1"> </text:span><text:span text:style-name="T2">(32/10) </text:span> ⲛⲏⲩ ⲉϩⲣⲁⲓ̈ ϩ̅ⲙ̅ ⲡⲙⲟⲟⲩ ⲉⲁⲉⲓϯ <text:line-break/><text:span text:style-name="T1"> </text:span><text:span text:style-name="T2">(32/11) </text:span> ϩ̅ⲓ̅ⲱⲱⲧ’ ⲙ̅ⲡⲟⲩⲟⲉⲓⲛ ⲛ̅ⲧⲡⲓⲥ‐ <text:line-break/><text:span text:style-name="T1"> </text:span><text:span text:style-name="T2">(32/12) </text:span> ⲧⲓⲥ· ⲁⲩⲱ ⲙ̅ⲡⲕⲱϩ̅ⲧ̅ ⲛ̅ⲛⲁⲧⲱ‐ <text:line-break/><text:span text:style-name="T1"> </text:span><text:span text:style-name="T2">(32/13) </text:span> ϣ̅ⲙ̅· ϣⲓⲛⲁ ⲉⲃⲟⲗ ϩ̅ⲛ̅ ⲧⲁⲁⲫⲟⲣⲙⲏ <text:line-break/><text:span text:style-name="T1"> </text:span><text:span text:style-name="T2">(32/14) </text:span> ⲉⲥⲛⲁⲣ̅ⲇⲓⲁⲡⲉⲣⲁ ⲛ̅ϭⲓ ⲧⲇⲩⲛⲁⲙⲓⲥ <text:line-break/><text:span text:style-name="T1"> </text:span><text:span text:style-name="T2">(32/15) </text:span> ⲙ̅ⲡ̅ⲡ̅ⲛⲁ̅ ⲧⲁⲓ̈ ⲉⲩⲛⲁⲥⲉⲧ̅ⲥ̅ ϩ̅ⲛ̅ ⲧⲕⲧⲓ‐ <text:line-break/><text:span text:style-name="T1"> </text:span><text:span text:style-name="T2">(32/16) </text:span> ⲥⲓⲥ ϩ̅ⲓ̅ⲧ̅ⲛ̅ ⲛ̅ⲧⲏⲟⲩ ⲙ̅ⲛ̅ ⲛ̅ⲇⲁⲓⲙⲱⲛ <text:line-break/><text:span text:style-name="T1"> </text:span><text:span text:style-name="T2">(32/17) </text:span> ⲙ̅ⲛ̅ ⲛ̅ⲥⲓⲟⲩ· ⲁⲩⲱ ϩⲣⲁⲓ̈ ⲛ̅ϩⲏⲧⲟⲩ <text:line-break/><text:span text:style-name="T1"> </text:span><text:span text:style-name="T2">(32/18) </text:span> ⲥⲛⲁⲙⲟⲩϩ ⲛ̅ϭⲓ ⲁⲕⲁⲑⲁⲣⲥⲓⲁ ⲛⲓⲙ· <text:line-break/><text:span text:style-name="T1"> </text:span><text:span text:style-name="T2">(32/19) </text:span> ⲗⲟⲓⲡⲟⲛ ⲱ ⲥ̅ⲏ̅ⲉ̅ⲙ̅ ⲉⲣⲓⲗⲟⲅⲓⲍⲉ <text:line-break/><text:soft-page-break/><text:span text:style-name="T1"> </text:span><text:span text:style-name="T2">(32/20) </text:span> ⲙ̅ⲙⲟⲕ ⲟⲩⲁⲁⲕ ⲛ̅ⲕⲁⲛⲁⲓ̈ ϩ̅ⲙ̅ ⲡⲙⲉ‐ <text:line-break/><text:span text:style-name="T1"> </text:span><text:span text:style-name="T2">(32/21) </text:span> ⲉⲩⲉ ⲙ̅ⲡⲟⲩⲟⲉⲓⲛ· ⲙ̅ⲡ̅ⲣ̅ⲧⲣⲉ <text:line-break/><text:span text:style-name="T1"> </text:span><text:span text:style-name="T2">(32/22) </text:span> ⲡⲉⲕⲙⲉⲉⲩⲉ ⲕⲟⲓⲛⲱⲛⲓ ⲙ̅ⲛ̅ <text:line-break/><text:span text:style-name="T1"> </text:span><text:span text:style-name="T2">(32/23) </text:span> ⲡⲕⲱϩ̅ⲧ̅’̅ ⲙ̅ⲛ̅ ⲡⲥⲱⲙⲁ ⲛ̅ⲕⲁ‐ <text:line-break/><text:span text:style-name="T1"> </text:span><text:span text:style-name="T2">(32/24) </text:span> ⲕⲉ· ⲡⲁⲓ̈ ⲛⲉϥϣⲟⲟⲡ ⲛ̅ⲉⲣⲅⲟⲛ <text:line-break/><text:span text:style-name="T1"> </text:span><text:span text:style-name="T2">(32/25) </text:span> ⲛ̅ⲁⲕⲁⲑⲁⲣⲧⲟⲛ· ⲛⲉϯⲧⲥⲁⲃⲟ‐ <text:line-break/><text:span text:style-name="T1"> </text:span><text:span text:style-name="T2">(32/26) </text:span> ⲙ̅ⲙⲟⲕ ⲉⲣⲟⲟⲩ ϩⲉⲛⲇⲓⲕⲁⲓⲟⲛ <text:line-break/><text:span text:style-name="T1"> </text:span><text:span text:style-name="T2">(32/27) </text:span> ⲛⲉ· ⲧⲁⲓ̈ ⲧⲉ ⲧⲡⲁⲣⲁⲫⲣⲁⲥⲓⲥ <text:line-break/><text:span text:style-name="T1"> </text:span><text:span text:style-name="T2">(32/28) </text:span> ⲡⲥⲧⲉⲣⲉⲱⲙⲁ ⲅⲁⲣ ⲙ̅ⲡⲉⲕⲣ̅ ⲡⲙⲉ‐ <text:line-break/><text:span text:style-name="T1"> </text:span><text:span text:style-name="T2">(32/29) </text:span> ⲉⲩⲉ ϫⲉ ⲧⲉⲕⲅⲉⲛⲉⲁ ⲛ̅ⲧⲁⲩϩⲁ <text:line-break/><text:span text:style-name="T1"> </text:span><text:span text:style-name="T2">(32/30) </text:span> ⲣⲉϩ ⲉⲣⲟⲥ ⲉⲣⲟϥ· ⲉ̅ⲗ̅ⲱ̅ⲣ̅ⲭ̅ⲁ̅ⲓ̅ⲟ̅ⲥ̅ <text:line-break/><text:span text:style-name="T1"> </text:span><text:span text:style-name="T2">(32/31) </text:span> ⲡⲉ ⲡⲣⲁⲛ ⲙ̅ⲡⲛⲟϭ ⲛ̅ⲟⲩⲟⲉⲓⲛ· <text:line-break/><text:span text:style-name="T1"> </text:span><text:span text:style-name="T2">(32/32) </text:span> ⲡⲙⲁ ⲛ̅ⲧⲁⲓ̈ⲉ̅ⲓ̅ ⲉⲃⲟⲗ ⲛ̅ϩⲏⲧ̅ϥ̅· ⲡⲗⲟ‐ <text:line-break/><text:span text:style-name="T1"> </text:span><text:span text:style-name="T2">(32/33) </text:span> ⲅⲟⲥ ⲉⲙ̅ⲛ̅ ⲡⲉⲧ’ⲧ̅ⲛ̅ⲧⲱⲛ ⲉⲣⲟϥ· <text:line-break/><text:span text:style-name="T1"> </text:span><text:span text:style-name="T2">(32/34) </text:span> ⲁⲩⲱ ⲡⲓⲛⲉ ⲧⲉ ⲧⲁϩ̅ⲃ̅ⲥⲱ ⲉⲧ‐ <text:line-break/><text:span text:style-name="T1"> </text:span><text:span text:style-name="T2">(32/35) </text:span> ⲧⲁⲉⲓⲏⲟⲩ· ⲁⲩⲱ ⲇⲉⲣⲇⲉⲣⲕⲉ <text:line-break/><text:span text:style-name="T1"> </text:span><text:span text:style-name="T2">(32/36) </text:span> ⲁⲥ ⲡ[.]ⲁⲛ̣[..]ⲡⲉ ϥ̣ϣⲁϫⲉ <text:line-break/><text:span text:style-name="T1"> </text:span><text:span text:style-name="T2">(33/1) </text:span> ϩ̅ⲙ̅ ⲡϩⲣⲟⲟⲩ ⲙ̅ⲡⲟⲩⲟⲉⲓⲛ· ⲁⲩⲱ <text:line-break/><text:span text:style-name="T1"> </text:span><text:span text:style-name="T2">(33/2) </text:span> ⲥⲧⲣⲟⲫⲁⲓⲁ ⲡϭⲱϣ̅ⲧ̅’̅ ⲡⲉ ⲉⲧ’‐ <text:line-break/><text:span text:style-name="T1"> </text:span><text:span text:style-name="T2">(33/3) </text:span> ⲥⲙⲁⲙⲁⲁⲧ’ ⲉⲧⲉ ⲡⲁⲓ̈ ⲡⲉ ⲡ̅ⲛ̅ⲁ̅· <text:line-break/><text:span text:style-name="T1"> </text:span><text:span text:style-name="T2">(33/4) </text:span> ⲁⲩⲱ ⲭ̅ⲉ̅ⲗ̅ⲕ̅ⲉ̅ⲁ̅ⲭ̅· ⲉⲧⲉ ⲧⲁϩ̅ⲃ̅ⲥⲱ <text:line-break/><text:span text:style-name="T1"> </text:span><text:span text:style-name="T2">(33/5) </text:span> ⲧⲉ· ⲡⲉⲣⲉ̅ⲓ̅ ⲉⲃⲟⲗ ϩ̅ⲙ̅ ⲡⲑⲁⲩⲙⲁ· <text:line-break/><text:span text:style-name="T1"> </text:span><text:span text:style-name="T2">(33/6) </text:span> ⲡⲁⲓ̈ ⲛⲉϥϩ̅ⲛ̅ ⲧⲕⲗⲟⲟⲗⲉ ⲙ̅ⲫⲩ‐ <text:line-break/><text:span text:style-name="T1"> </text:span><text:span text:style-name="T2">(33/7) </text:span> ⲙⲏⲛ ⲉⲣⲟⲩⲱⲛ̅ϩ̅ ⲉⲃⲟⲗ ⲉϥⲟ‐ <text:line-break/><text:span text:style-name="T1"> </text:span><text:span text:style-name="T2">(33/8) </text:span> ⲛ̅ⲕⲗⲟⲟⲗⲉ ⲛ̅ϣⲟⲙⲧⲉ ⲙ̅ⲙⲟⲣ‐ <text:line-break/><text:span text:style-name="T1"> </text:span><text:span text:style-name="T2">(33/9) </text:span> ⲫⲏ· ⲁⲩⲱ ⲭⲉ̅ⲗ̅ⲕ̅ⲉ̅ⲁ̅ ⲧⲁϩ̅ⲃ̅ⲥⲱ ⲧⲉ· <text:line-break/><text:span text:style-name="T1"> </text:span><text:span text:style-name="T2">(33/10) </text:span> ⲉⲧⲟ ⲙ̅ⲙⲟⲣⲫⲏ ⲥ̅ⲛ̅ⲧⲉ· ⲡⲁⲓ̈ <text:line-break/><text:span text:style-name="T1"> </text:span><text:span text:style-name="T2">(33/11) </text:span> ⲛⲉϥϩ̅ⲛ̅ ⲧⲕⲗⲟⲟⲗⲉ ⲙ̅ⲡⲕⲁⲣⲱϥ· <text:line-break/><text:span text:style-name="T1"> </text:span><text:span text:style-name="T2">(33/12) </text:span> ⲁⲩⲱ ⲭⲉⲗⲕⲉ ⲧⲁϩ̅ⲃ̅ⲥⲱ ⲧⲉ ⲛ̅ⲧⲁⲩ <text:line-break/><text:span text:style-name="T1"> </text:span><text:span text:style-name="T2">(33/13) </text:span> ⲧⲁⲁⲥ ⲛⲁϥ ⲉⲃⲟⲗ ϩ̅ⲙ̅ ⲙⲉⲣⲟⲥ ⲛⲓⲙ <text:line-break/><text:span text:style-name="T1"> </text:span><text:span text:style-name="T2">(33/14) </text:span> ⲁⲩⲧⲁⲁⲥ ⲛⲁϥ ⲛ̅ⲛⲟⲩⲉⲓⲇⲟⲥ ⲛ̅‐ <text:line-break/><text:span text:style-name="T1"> </text:span><text:span text:style-name="T2">(33/15) </text:span> ⲟⲩⲱⲧ ⲉⲃⲟⲗ ϩ̅ⲛ̅ ⲧⲙ̅ⲛⲧ’̅ⲛⲟϭ ⲡⲁⲓ̈ <text:line-break/><text:span text:style-name="T1"> </text:span><text:span text:style-name="T2">(33/16) </text:span> ⲛⲉϥϣⲟⲟⲡ ϩ̅ⲛ̅ ⲧⲕⲗⲟⲟⲗⲉ ⲛ̅ⲧⲙⲉ‐ <text:line-break/><text:span text:style-name="T1"> </text:span><text:span text:style-name="T2">(33/17) </text:span> ⲥⲟⲧⲏⲥ· ⲁⲩⲱ ⲡⲥⲓⲟⲩ ⲙ̅ⲡⲟⲩⲟ‐ <text:line-break/><text:span text:style-name="T1"> </text:span><text:span text:style-name="T2">(33/18) </text:span> ⲉⲓⲛ ⲛ̅ⲧⲁⲩϣⲁϫⲉ ⲉⲣⲟϥ ⲧⲁϩ̅ⲃ̅ⲥⲱ‐ <text:line-break/><text:span text:style-name="T1"> </text:span><text:span text:style-name="T2">(33/19) </text:span> ⲧⲉ ⲉⲙⲁⲩϣϫⲣⲟ ⲉⲣⲟⲥ· ⲧⲁⲓ̈ ⲛ̅‐ <text:line-break/><text:span text:style-name="T1"> </text:span><text:span text:style-name="T2">(33/20) </text:span> ⲧⲁⲉⲓⲫⲟⲣⲓ ⲙ̅ⲙⲟⲥ ϩ̅ⲛ̅ⲛ ⲉⲙ̅ⲛ̅ⲧⲉ· <text:line-break/><text:span text:style-name="T1"> </text:span><text:span text:style-name="T2">(33/21) </text:span> ⲉⲧⲉ ⲡⲁⲓ̈ ⲡⲉ ⲡⲛⲁⲉ ⲉⲧ̅ⲙ̅ⲡⲥⲁⲛ <text:line-break/><text:span text:style-name="T1"> </text:span><text:span text:style-name="T2">(33/22) </text:span> ϩⲣⲉ ⲙ̅ⲡⲙⲉⲉⲩⲉ· ⲙ̅ⲛ̅ ⲧⲙⲁⲣⲧⲩ‐ <text:line-break/><text:span text:style-name="T1"> </text:span><text:span text:style-name="T2">(33/23) </text:span> ⲣⲓⲁ ⲛ̅ⲛⲉⲧⲛⲁⲣ̅ⲙⲁⲣⲧⲩⲣⲓ· ⲁⲩⲱ <text:line-break/><text:span text:style-name="T1"> </text:span><text:span text:style-name="T2">(33/24) </text:span> ⲧⲙⲁⲣⲧⲩⲣⲓⲁ ⲛ̅ⲧⲁⲩϣⲁϫⲉ ⲉⲣⲟⲥ <text:line-break/><text:span text:style-name="T1"> </text:span><text:span text:style-name="T2">(33/25) </text:span> ⲧϣⲟⲣ̅ⲡ̅ ⲙ̅ⲛ̅ ⲑⲁⲏ· ⲧⲡⲓⲥⲧⲓⲥ· <text:line-break/><text:span text:style-name="T1"> </text:span><text:span text:style-name="T2">(33/26) </text:span> ⲡⲛⲟⲩⲥ ⲙ̅ⲡⲧⲏⲩ ⲛ̅ⲕⲁⲕⲉ· ⲁⲩ‐ <text:line-break/><text:span text:style-name="T1"> </text:span><text:span text:style-name="T2">(33/27) </text:span> ⲱ ⲥⲟⲫⲁⲓⲁ· ⲙ̅ⲛ̅ ⲥⲁⲫⲁⲓⲛⲁ· ϩ̅ⲛ̅ <text:line-break/><text:span text:style-name="T1"> </text:span><text:span text:style-name="T2">(33/28) </text:span> ⲧⲕⲗⲟⲟⲗⲉ ⲛ̅ⲛⲉⲛⲧⲁⲩⲡⲟⲣϫⲟⲩ <text:line-break/><text:span text:style-name="T1"> </text:span><text:span text:style-name="T2">(33/29) </text:span> ⲉⲃⲟⲗ ϩ̅ⲙ̅ ⲡⲕⲱϩ̅ⲧ’̅ ⲉⲧ’ϣⲧ̅ⲣ̅ⲧⲱⲣ· <text:line-break/><text:span text:style-name="T1"> </text:span><text:span text:style-name="T2">(33/30) </text:span> ⲁⲩⲱ ⲡⲇⲓⲕⲁⲓⲟⲥ ⲥⲡⲓⲛⲑⲏⲣ ⲧⲕⲗⲟ‐ <text:line-break/><text:soft-page-break/><text:span text:style-name="T1"> </text:span><text:span text:style-name="T2">(33/31) </text:span> ⲟⲗⲉ ⲛ̅ⲟⲩⲟⲉⲓⲛ ⲧⲉ· ⲧⲁⲓ̈ ⲉ〈ⲣ〉ⲣ̅ⲟⲩⲟ‐ <text:line-break/><text:span text:style-name="T1"> </text:span><text:span text:style-name="T2">(33/32) </text:span> ⲉⲓⲛ ϩ̅ⲛ̅ ⲧⲉⲧ̅ⲛ̅ⲙⲏⲧⲉ· ϩⲣⲁⲓ̈ ⲅⲁⲣ <text:line-break/><text:span text:style-name="T1"> </text:span><text:span text:style-name="T2">(33/33) </text:span> ⲛ̅ϩⲏⲧ̅ⲥ̅ ⲉⲧⲁϩ̅ⲃ̅ⲥⲱ ⲛⲁⲃⲱⲕ ⲉ‐ <text:line-break/><text:span text:style-name="T1"> </text:span><text:span text:style-name="T2">(33/34) </text:span> ⲡⲓⲧ̅ⲛ̅ ⲉⲡⲭⲁⲟⲥ· ⲡⲟⲩⲟⲉⲓ[ⲛ] ⲇ̣‐ <text:line-break/><text:span text:style-name="T1"> </text:span><text:span text:style-name="T2">(34/1) </text:span> ⲉⲧ’ϫⲁϩ̅ⲙ̅ ⲉϥϣⲟⲟⲡ ⲛ̅ⲇⲩⲛⲁ̣‐ <text:line-break/><text:span text:style-name="T1"> </text:span><text:span text:style-name="T2">(34/2) </text:span> ⲙⲓⲥ· ⲡⲉⲣⲟⲩⲱⲛ̅ϩ̅ ⲉⲃⲟⲗ ϩ̅ⲙ̅ ⲡⲕⲁ‐ <text:line-break/><text:span text:style-name="T1"> </text:span><text:span text:style-name="T2">(34/3) </text:span> ⲕⲉ· ⲡⲉⲧⲏⲡ ⲁⲧ’ⲫⲩⲥⲓⲥ ⲛ̅ⲕⲁⲕⲉ· <text:line-break/><text:span text:style-name="T1"> </text:span><text:span text:style-name="T2">(34/4) </text:span> ⲡⲉⲑⲏⲣ ⲇⲉ ⲙ̅ⲛ̅ ⲡⲁⲏⲣ· ⲙ̅ⲛ̅ ⲛ̅ⲇⲩ‐ <text:line-break/><text:span text:style-name="T1"> </text:span><text:span text:style-name="T2">(34/5) </text:span> ⲛⲁⲙⲓⲥ· ⲙ̅ⲛ̅ ⲛ̅ⲉⲝⲟⲩⲥⲓⲁ· ⲛ̅ⲇⲁⲓ‐ <text:line-break/><text:span text:style-name="T1"> </text:span><text:span text:style-name="T2">(34/6) </text:span> ⲙⲱⲛ ⲙ̅ⲛ̅ ⲛ̅ⲥⲓⲟⲩ· ⲛⲁⲓ̈ ⲛⲉⲩⲛ̅‐ <text:line-break/><text:span text:style-name="T1"> </text:span><text:span text:style-name="T2">(34/7) </text:span> ⲧⲁⲩ ⲙ̅ⲙⲁⲩ ⲛ̅ⲛⲟⲩϣ̅ⲗ̅ⲙⲉ ⲛ̅ⲕⲱ‐ <text:line-break/><text:span text:style-name="T1"> </text:span><text:span text:style-name="T2">(34/8) </text:span> ϩ̅ⲧ̅· ⲙ̅ⲛ̅ⲛ ⲟⲩⲟⲉⲓⲛ ⲉⲃⲟⲗ ϩ̅ⲙ̅ ⲡ̅ⲛⲁ̅· <text:line-break/><text:span text:style-name="T1"> </text:span><text:span text:style-name="T2">(34/9) </text:span> ⲁⲩⲱ ⲙⲟⲗⲩⲭⲑⲁⲥ ⲟⲩⲧⲏⲟⲩ ⲡⲉ· <text:line-break/><text:span text:style-name="T1"> </text:span><text:span text:style-name="T2">(34/10) </text:span> ϫⲉ ⲛ̅ⲟⲩⲉϣ ⲛ̅ⲃ̅ⲗ̅ⲗⲁϥ ⲥⲉϫⲡⲉ <text:line-break/><text:span text:style-name="T1"> </text:span><text:span text:style-name="T2">(34/11) </text:span> ⲗⲁⲁⲩ ⲁⲛ ϩ̅ⲓ̅ϫ̅ⲙ̅ ⲡⲕⲁϩ· ⲉⲩⲛ̅ⲧⲁϥ <text:line-break/><text:span text:style-name="T1"> </text:span><text:span text:style-name="T2">(34/12) </text:span> ⲙ̅ⲙⲁⲩ ⲛ̅ⲟⲩⲉⲓⲛⲉ ⲛ̅ϩⲟϥ· ⲁⲩⲱ <text:line-break/><text:span text:style-name="T1"> </text:span><text:span text:style-name="T2">(34/13) </text:span> ⲙ̅ⲡⲁⲡⲧⲁⲡ ⲛ̅ⲟⲩⲱⲧ’· ⲡⲉϥⲡⲱ <text:line-break/><text:span text:style-name="T1"> </text:span><text:span text:style-name="T2">(34/14) </text:span> ϩ̅ⲧ̅ ⲉⲃⲟⲗ ϩⲉⲛⲧ̅ⲛϩ̅ ⲛⲉ ⲉⲩⲉ ⲙ̅ⲙⲟⲣ‐ <text:line-break/><text:span text:style-name="T1"> </text:span><text:span text:style-name="T2">(34/15) </text:span> ⲫⲏ ⲛⲓⲙ· ⲡⲥⲱϫ̅ⲡ̅ ⲇⲉ ⲧⲁⲧⲉ ⲧⲉ <text:line-break/><text:span text:style-name="T1"> </text:span><text:span text:style-name="T2">(34/16) </text:span> ⲛ̅ⲧⲁⲩϣ̅ⲣ̅ϣⲱⲣ̅ⲥ̅· ⲛ̅ⲧⲕ ⲟⲩⲙⲁⲕⲁ‐ <text:line-break/><text:span text:style-name="T1"> </text:span><text:span text:style-name="T2">(34/17) </text:span> ⲣⲓⲟⲥ ⲥ̅ⲏ̅ⲉ̅ⲙ̅̓ ϫⲉ ⲁⲩϩⲁⲣⲉϩ ⲉⲧⲉⲕ‐ <text:line-break/><text:span text:style-name="T1"> </text:span><text:span text:style-name="T2">(34/18) </text:span> ⲅⲉⲛⲉⲁ ⲉⲡⲧⲏⲩ ⲛ̅ⲕⲁⲕⲉ ⲉⲧⲟ ⲛ̅‐ <text:line-break/><text:span text:style-name="T1"> </text:span><text:span text:style-name="T2">(34/19) </text:span> ϩⲁϩ ⲙ̅ⲡⲣⲟⲥⲱⲡⲟⲛ· ⲁⲩⲱ ⲥⲉⲛⲁ‐ <text:line-break/><text:span text:style-name="T1"> </text:span><text:span text:style-name="T2">(34/20) </text:span> ⲣ̅ⲙⲁⲣⲧⲩⲣⲓ ⲛ̅ⲧⲙⲁⲣⲧⲩⲣⲓⲁ ⲛ̅ⲕⲁ‐ <text:line-break/><text:span text:style-name="T1"> </text:span><text:span text:style-name="T2">(34/21) </text:span> ⲑⲟⲗⲓⲕⲏ· ⲁⲩⲱ ⲁⲧ’ⲧⲣⲓⲃⲏ ⲛ̅ⲁⲕⲁ‐ <text:line-break/><text:span text:style-name="T1"> </text:span><text:span text:style-name="T2">(34/22) </text:span> ⲑⲁⲣⲧⲟⲥ ⲛ̅ⲧⲉ ⲧⲡⲓⲥⲧⲓⲥ· ⲁⲩⲱ <text:line-break/><text:span text:style-name="T1"> </text:span><text:span text:style-name="T2">(34/23) </text:span> ⲥⲉⲛⲁⲣ̅ ϫⲁⲥⲓϩⲏⲧ’ ϩ̅ⲙ̅ ⲫⲩⲡⲟ‐ <text:line-break/><text:span text:style-name="T1"> </text:span><text:span text:style-name="T2">(34/24) </text:span> ⲙⲛⲏⲙⲁ ⲙ̅ⲡⲟⲩⲟⲉⲓⲛ ⲱ ⲥ̅ⲏ̅ⲉ̅ⲙ̅· <text:line-break/><text:span text:style-name="T1"> </text:span><text:span text:style-name="T2">(34/25) </text:span> ⲙ̅ⲛ̅ ⲗⲁⲁⲩ ⲉϥⲣ̅ⲫⲟⲣⲓ ⲙ̅ⲡⲥⲱⲙⲁ <text:line-break/><text:span text:style-name="T1"> </text:span><text:span text:style-name="T2">(34/26) </text:span> ⲛⲁϣϫⲉⲕ ⲛⲁⲓ̈ ⲉⲃⲟⲗ· ⲁⲗⲗⲁ ϩ̅ⲛ̅ <text:line-break/><text:span text:style-name="T1"> </text:span><text:span text:style-name="T2">(34/27) </text:span> ⲟⲩⲣ̅ ⲡⲙⲉⲉⲩⲉ ϥⲛⲁϣⲁⲙⲁϩ <text:line-break/><text:span text:style-name="T1"> </text:span><text:span text:style-name="T2">(34/28) </text:span> ⲧⲉ ⲙ̅ⲙⲟⲟⲩ· ϫⲉⲕⲁⲁⲥ ⲉⲣϣⲁⲛ <text:line-break/><text:span text:style-name="T1"> </text:span><text:span text:style-name="T2">(34/29) </text:span> ⲡⲉϥⲙⲉⲉⲩⲉ ⲡⲱⲣ̅ϫ̅ ⲉⲡⲥⲱⲙⲁ <text:line-break/><text:span text:style-name="T1"> </text:span><text:span text:style-name="T2">(34/30) </text:span> ⲧⲟⲧⲉ ⲥⲉⲛⲁⲟⲩⲱⲛ̅ϩ̅ ⲉⲃⲟⲗ ⲛⲁϥ <text:line-break/><text:span text:style-name="T1"> </text:span><text:span text:style-name="T2">(34/31) </text:span> ⲛ̅ϭⲓ ⲛⲁⲓ̈ ⲁⲩⲟⲩⲱⲛ̅ϩ̅ ⲉⲃⲟⲗ ⲛ̅ⲧⲉⲕ‐ <text:line-break/><text:span text:style-name="T1"> </text:span><text:span text:style-name="T2">(34/32) </text:span> ⲅⲉⲛⲉⲁ ⲱ ⲥ̅ⲏ̅ⲉ̅ⲙ̅̓ ⲥⲙⲟⲕ̅ϩ̅ ⲛ̅ⲟⲩⲁ <text:line-break/><text:span text:style-name="T1"> </text:span><text:span text:style-name="T2">(34/33) </text:span> ⲉ[ϥ]ⲣ̅ⲫⲟⲣⲓ ⲛ̅ⲥⲱⲙⲁ ⲉⲧⲣⲉϥϫⲉⲕ <text:line-break/><text:span text:style-name="T1"> </text:span><text:span text:style-name="T2">(34/34) </text:span> [ⲛⲁ]ⲓ̣̈ [ⲉⲃⲟ]ⲗ̣ [ⲛ̅ⲑⲉ] ⲛ̣̅[ⲧⲁ]ⲓ̈ϫⲟⲟ̣ⲥ̣ ⲛ̣ⲁⲕ <text:line-break/><text:span text:style-name="T1"> </text:span><text:span text:style-name="T2">(35/1) </text:span> ⲁⲩⲱ ⲟⲩϭⲁⲡⲉ ϣⲏⲙ ⲧⲉⲧⲛⲁ <text:line-break/><text:span text:style-name="T1"> </text:span><text:span text:style-name="T2">(35/2) </text:span> ϫⲟⲕⲟⲩ ⲉⲃⲟⲗ̓ ⲛⲉⲧⲉⲩⲛ̅ⲧⲁⲩ <text:line-break/><text:span text:style-name="T1"> </text:span><text:span text:style-name="T2">(35/3) </text:span> ⲙ̅ⲙⲁⲩ ⲛ̅ⲧϣ̅ⲗ̅ⲙⲉ ⲙ̅ⲡⲛⲟⲩⲥ <text:line-break/><text:span text:style-name="T1"> </text:span><text:span text:style-name="T2">(35/4) </text:span> ⲙ̅ⲛ̅ ⲡⲙⲉⲉⲩⲉ ⲙ̅ⲡⲟⲩⲟⲉⲓⲛ ⲙ̅ⲡ̅‐ <text:line-break/><text:span text:style-name="T1"> </text:span><text:span text:style-name="T2">(35/5) </text:span> ⲡ̅ⲛ̅ⲁ̅· ⲥⲉⲛⲁϩⲁⲣⲉϩ ⲉⲡⲟⲩⲙⲉ <text:line-break/><text:span text:style-name="T1"> </text:span><text:span text:style-name="T2">(35/6) </text:span> ⲉⲩⲉ ⲉⲧ’ⲧⲣⲓⲃⲏ ⲉⲧ’ϫⲁϩ̅ⲙ̅· ⲟⲩ‐ <text:line-break/><text:span text:style-name="T1"> </text:span><text:span text:style-name="T2">(35/7) </text:span> ⲛ̅ ϩⲁϩ ⲅⲁⲣ ϩ̅ⲛ̅ ⲧⲅⲉⲛⲉⲁ ⲛ̅ⲧⲫⲩ‐ <text:line-break/><text:span text:style-name="T1"> </text:span><text:span text:style-name="T2">(35/8) </text:span> ⲥⲓⲥ ⲥⲉⲛⲁϣⲓⲛⲉ ⲛ̅ⲥⲁ ⲡⲱⲣ̅ϫ̅ <text:line-break/><text:span text:style-name="T1"> </text:span><text:span text:style-name="T2">(35/9) </text:span> ⲛ̅ⲧϭⲁⲙ· ⲥⲉⲛⲁϭ̅ⲛ̅ⲧ̅ϥ̅ ⲁⲛ· ⲟⲩ‐ <text:line-break/><text:soft-page-break/><text:span text:style-name="T1"> </text:span><text:span text:style-name="T2">(35/10) </text:span> ⲧⲉ ⲥⲉⲛⲁϣϭ̅ⲙ̅ϭⲁⲙ ⲁⲛ ⲉⲧⲣⲉⲩ‐ <text:line-break/><text:span text:style-name="T1"> </text:span><text:span text:style-name="T2">(35/11) </text:span> ⲉⲓⲣⲉ ⲙ̅ⲡⲟⲩⲱϣ ⲛ̅ⲧⲡⲓⲥⲧⲓⲥ· <text:line-break/><text:span text:style-name="T1"> </text:span><text:span text:style-name="T2">(35/12) </text:span> ⲉⲩϣⲟⲟⲡ ⲅⲁⲣ ⲛ̅ⲥⲡⲉⲣⲙⲁ ⲙ̅ⲡⲕⲁ‐ <text:line-break/><text:span text:style-name="T1"> </text:span><text:span text:style-name="T2">(35/13) </text:span> ⲕⲉ ⲛ̅ⲕⲁⲑⲟⲗⲓⲕⲟⲛ· ⲁⲩⲱ ⲛⲉⲧⲟⲩ <text:line-break/><text:span text:style-name="T1"> </text:span><text:span text:style-name="T2">(35/14) </text:span> ⲛⲁϭ̅ⲛ̅ⲧⲟⲩ ϩ̅ⲛ̅ ϩⲁϩ ⲛ̅ϩ̅ⲓ̅ⲥⲉ· ⲛ̅ⲧⲏ‐ <text:line-break/><text:span text:style-name="T1"> </text:span><text:span text:style-name="T2">(35/15) </text:span> ⲟⲩ ⲙ̅ⲛ̅ ⲛ̅ⲇⲁⲓⲙⲱⲛ ⲛⲁⲙⲉⲥⲧⲱ‐ <text:line-break/><text:span text:style-name="T1"> </text:span><text:span text:style-name="T2">(35/16) </text:span> ⲟⲩ· ⲟⲩⲛⲟϭ ⲇⲉ ⲧⲉ ⲧⲙ̅ⲣ̅ⲣⲉ ⲙ̅ⲡ̅‐ <text:line-break/><text:span text:style-name="T1"> </text:span><text:span text:style-name="T2">(35/17) </text:span> ⲥⲱⲙⲁ· ⲡⲙⲁ ⲅⲁⲣ ⲉⲧⲟⲩⲥⲓⲧⲉ <text:line-break/><text:span text:style-name="T1"> </text:span><text:span text:style-name="T2">(35/18) </text:span> ⲙ̅ⲙⲁⲩ ⲛ̅ϭⲓ ⲛ̅ⲧⲏⲟⲩ ⲙ̅ⲛ̅ ⲛ̅ⲥⲓⲟⲩ <text:line-break/><text:span text:style-name="T1"> </text:span><text:span text:style-name="T2">(35/19) </text:span> ⲙ̅ⲛ̅ ⲛ̅ⲇⲁⲓⲙⲱⲛ ⲉⲃⲟⲗ ϩ̅ⲛ̅ ⲧ̅’{ⲧ}ⲇⲩ‐ <text:line-break/><text:span text:style-name="T1"> </text:span><text:span text:style-name="T2">(35/20) </text:span> ⲛⲁⲙⲓⲥ ⲙ̅ⲡ̅ⲡ̅ⲛⲁ̅· ⲧⲙⲉⲧⲁⲛⲟⲓⲁ <text:line-break/><text:span text:style-name="T1"> </text:span><text:span text:style-name="T2">(35/21) </text:span> ⲙ̅ⲛ̅ ⲧⲙⲁⲣⲧⲩⲣⲓⲁ ⲛⲁⲟⲩⲱⲛ̅ϩ̅ ⲉ‐ <text:line-break/><text:span text:style-name="T1"> </text:span><text:span text:style-name="T2">(35/22) </text:span> ⲃⲟⲗ ⲉϩⲣⲁⲓ̈ ⲉϫⲱⲟⲩ· ⲁⲩⲱ ⲡⲛⲁ <text:line-break/><text:span text:style-name="T1"> </text:span><text:span text:style-name="T2">(35/23) </text:span> ⲛⲁϫⲓ ⲙⲟⲉⲓⲧ’ ϩⲏⲧⲟⲩ ⲉϩⲟⲩⲛ <text:line-break/><text:span text:style-name="T1"> </text:span><text:span text:style-name="T2">(35/24) </text:span> ⲉⲡⲡ̅ⲛ̅ⲁ̅ ⲛ̅ⲁⲅⲉⲛⲛⲏⲧⲟⲛ· ⲛⲉ <text:line-break/><text:span text:style-name="T1"> </text:span><text:span text:style-name="T2">(35/25) </text:span> ⲧⲉⲩⲛ̅ⲧⲁⲩ ⲇⲉ ⲙ̅ⲙⲁⲩ ⲛ̅ⲧⲙⲉ <text:line-break/><text:span text:style-name="T1"> </text:span><text:span text:style-name="T2">(35/26) </text:span> ⲧⲁⲛⲟⲓⲁ· ⲥⲉⲛⲁⲙ̅ⲧⲟⲛ ⲙ̅ⲙⲟⲟⲩ <text:line-break/><text:span text:style-name="T1"> </text:span><text:span text:style-name="T2">(35/27) </text:span> ϩⲣⲁⲓ̈ ϩ̅ⲛ̅ ⲧⲥⲩⲛⲧⲉⲗⲉⲓⲁ ⲙ̅ⲛ̅ ⲧⲡⲓⲥ‐ <text:line-break/><text:span text:style-name="T1"> </text:span><text:span text:style-name="T2">(35/28) </text:span> ⲧⲓⲥ· ϩⲣⲁⲓ̈ ϩ̅ⲙ̅ ⲡⲧⲟⲡⲟⲥ ⲙ̅ⲫⲩ‐ <text:line-break/><text:span text:style-name="T1"> </text:span><text:span text:style-name="T2">(35/29) </text:span> ⲙⲏⲛ· ⲧⲁⲓ̈ ⲧⲉ ⲧⲡⲓⲥⲧⲓⲥ ⲉⲧⲛⲁ‐ <text:line-break/><text:span text:style-name="T1"> </text:span><text:span text:style-name="T2">(35/30) </text:span> ⲙⲟⲩϩ ⲙ̅ⲡⲧⲟⲡⲟⲥ ⲛ̅ⲧⲁⲩϣⲟ‐ <text:line-break/><text:span text:style-name="T1"> </text:span><text:span text:style-name="T2">(35/31) </text:span> ϫ̅ⲧ̅’̅ ⲉⲣⲟϥ· ⲛⲉⲧⲉ ⲙ̅ⲛ̅ⲧⲁⲩ ⲇⲉ <text:line-break/><text:span text:style-name="T1"> </text:span><text:span text:style-name="T2">(35/32) </text:span> ⲉⲃⲟⲗ ϩ̅ⲙ̅ ⲡ̅ⲛⲁ̅ ⲛ̅ⲟⲩⲟⲉⲓⲛ· ⲁⲩ‐ <text:line-break/><text:span text:style-name="T1"> </text:span><text:span text:style-name="T2">(35/33) </text:span> ⲱ ⲉⲃⲟⲗ ϩ̅ⲛ̅ ⲧⲡⲓⲥⲧⲓⲥ ⲥⲉⲛ̣ⲁ̣‐ <text:line-break/><text:span text:style-name="T1"> </text:span><text:span text:style-name="T2">(35/34) </text:span> ⲃⲱⲗ ⲉⲃⲟⲗ̣ ϩ̅ⲙ̅ ⲡⲕ̣[ⲁ]ⲕⲉ̣· ⲡ̣ⲙ[ⲁ] <text:line-break/><text:span text:style-name="T1"> </text:span><text:span text:style-name="T2">(36/1) </text:span> ⲉⲧⲉ ⲙ̅ⲡⲉ〈ⲧ〉ⲙⲉⲧⲁⲛⲟⲓⲁ ⲉⲓ ⲉⲙ[ⲁⲩ] <text:line-break/><text:span text:style-name="T1"> </text:span><text:span text:style-name="T2">(36/2) </text:span> ⲁⲛⲟⲕ ⲡⲉⲣⲟⲩⲱⲛ ⲉⲙⲡⲩⲗⲏ <text:line-break/><text:span text:style-name="T1"> </text:span><text:span text:style-name="T2">(36/3) </text:span> ϣⲁ ⲉⲛⲉϩ ⲉⲧ’ϣⲟⲧ̅ⲙ̅ ϫⲓⲛ ⲛ̅ϣⲟ‐ <text:line-break/><text:span text:style-name="T1"> </text:span><text:span text:style-name="T2">(36/4) </text:span> ⲣ̅ⲡ̅· ⲛⲉⲧ̅ⲣ̅ⲉⲡⲓⲑⲩⲙⲓ ⲉⲡϫⲓⲥⲉ ⲙ̅‐ <text:line-break/><text:span text:style-name="T1"> </text:span><text:span text:style-name="T2">(36/5) </text:span> ⲡⲱⲛ̅ϩ̅· ⲙ̅ⲛ̅ ⲛⲉⲧⲟ ⲛ̅ⲁⲝⲓⲟⲥ ⲛ̅ⲧⲁ‐ <text:line-break/><text:span text:style-name="T1"> </text:span><text:span text:style-name="T2">(36/6) </text:span> ⲛⲁⲡⲁⲩⲥⲓⲥ ⲁϥⲣ̅ⲫⲁⲛⲉⲣⲟⲩ ⲙ̅‐ <text:line-break/><text:span text:style-name="T1"> </text:span><text:span text:style-name="T2">(36/7) </text:span> ⲙⲟⲟⲩ ⲛⲁⲩ· ⲁⲛⲟⲕ ⲁⲉⲓⲭⲁⲣⲓⲍⲉ <text:line-break/><text:span text:style-name="T1"> </text:span><text:span text:style-name="T2">(36/8) </text:span> ⲛ̅ⲛⲟⲩⲉⲥⲑⲏⲥⲓⲥ ⲛ̅ⲛⲉⲧ̅ⲣ̅ⲉⲥⲑⲁ‐ <text:line-break/><text:span text:style-name="T1"> </text:span><text:span text:style-name="T2">(36/9) </text:span> ⲛⲉⲥⲑⲁⲓ· ⲁⲉⲓⲟⲩⲱⲛ ⲛⲁⲩ ⲛ̅ⲛ̅‐ <text:line-break/><text:span text:style-name="T1"> </text:span><text:span text:style-name="T2">(36/10) </text:span> ⲛⲟⲏⲥⲓⲥ ⲧⲏⲣⲟⲩ ⲙ̅ⲛ̅ ⲡⲇⲟⲅⲙⲁ <text:line-break/><text:span text:style-name="T1"> </text:span><text:span text:style-name="T2">(36/11) </text:span> ⲛ̅ⲛ̅ⲇⲓⲕⲁⲓⲟⲥ· ⲁⲩⲱ ⲙ̅ⲡⲓϣⲱⲡⲉ <text:line-break/><text:span text:style-name="T1"> </text:span><text:span text:style-name="T2">(36/12) </text:span> ⲛⲁⲩ ⲛ̅ϫⲁϫⲉ ϩ̅ⲛ̅ ⲗⲁⲁⲩ· ⲁⲛⲟⲕ ⲇⲉ <text:line-break/><text:span text:style-name="T1"> </text:span><text:span text:style-name="T2">(36/13) </text:span> ⲛ̅ⲧⲁⲣⲓⲣ̅ϩⲩⲡⲟⲙⲓⲛⲉ ⲁⲡϭⲱⲛ̅ⲧ̅’̅ <text:line-break/><text:span text:style-name="T1"> </text:span><text:span text:style-name="T2">(36/14) </text:span> ⲙ̅ⲡ̅ⲕⲟⲥⲙⲟⲥ ⲁⲉⲓϫⲣⲟ· ⲛⲉⲙ̅ⲛ̅ <text:line-break/><text:span text:style-name="T1"> </text:span><text:span text:style-name="T2">(36/15) </text:span> ⲟⲩⲁ ⲛ̅ϩⲏⲧⲟⲩ ⲉϥⲥⲟⲟⲩⲛ ⲙ̅ⲙⲟⲓ̈· <text:line-break/><text:span text:style-name="T1"> </text:span><text:span text:style-name="T2">(36/16) </text:span> ⲁⲩⲟⲩⲱⲛ ⲉϫⲱⲓ̈ ⲛ̅ϭⲓ ⲙ̅ⲡⲩⲗⲏ ⲙ̅‐ <text:line-break/><text:span text:style-name="T1"> </text:span><text:span text:style-name="T2">(36/17) </text:span> ⲡⲕⲱϩ̅ⲧ̅’̅ ⲙ̅ⲛ̅ ⲡⲕⲁⲡⲛⲟⲥ ⲉⲙ̅ⲛ̅ⲧⲉϥ <text:line-break/><text:span text:style-name="T1"> </text:span><text:span text:style-name="T2">(36/18) </text:span> ⲁⲣⲏϫ̅ϥ̅· ⲁⲛⲧⲏⲟⲩ ⲧⲏⲣⲟⲩ ⲧⲱⲛ <text:line-break/><text:span text:style-name="T1"> </text:span><text:span text:style-name="T2">(36/19) </text:span> ⲉϩⲣⲁⲓ̈ ⲉϫⲱⲓ̈· ⲛ̅ϩⲣⲟⲩⲙ̅ⲡⲉ ⲙ̅ⲛ̅ ⲛⲉ <text:line-break/><text:span text:style-name="T1"> </text:span><text:span text:style-name="T2">(36/20) </text:span> ⲃⲣⲏϭⲉⲥ ⲡⲣⲟⲥ ⲟⲩⲟⲉⲓϣ ⲥⲉⲛⲁⲧⲱ‐ <text:line-break/><text:span text:style-name="T1"> </text:span><text:span text:style-name="T2">(36/21) </text:span> ⲱⲛ ⲉϩⲣⲁⲓ̈ ⲉϫⲱⲓ̈· ⲁⲩⲱ ⲥⲉⲛⲁⲉⲓ‐ <text:line-break/><text:span text:style-name="T1"> </text:span><text:span text:style-name="T2">(36/22) </text:span> ⲛⲉ ⲙ̅ⲡⲟⲩϭⲱⲛ̅ⲧ̅’̅ ⲉϩⲣⲁⲓ̈ ⲉϫⲱⲓ̈· <text:line-break/><text:soft-page-break/><text:span text:style-name="T1"> </text:span><text:span text:style-name="T2">(36/23) </text:span> ⲁⲩⲱ ⲉⲧⲃⲏⲏⲧ’ ⲕⲁⲧⲁ ⲥⲁⲣ̅ⲝ̅ ⲥⲉ‐ <text:line-break/><text:span text:style-name="T1"> </text:span><text:span text:style-name="T2">(36/24) </text:span> ⲛⲁⲣ̅ⲁⲣⲭⲉⲓ ⲉϫⲱⲟⲩ ⲕⲁⲧⲁ ⲫⲩⲗⲏ· <text:line-break/><text:span text:style-name="T1"> </text:span><text:span text:style-name="T2">(36/25) </text:span> ⲟⲩⲛ̅ ϩⲁϩ ⲇⲉ ⲥⲉⲛⲁⲃⲱⲕ ⲉⲡⲓⲧ̅ⲛ̅ <text:line-break/><text:span text:style-name="T1"> </text:span><text:span text:style-name="T2">(36/26) </text:span> ⲁⲛⲙⲟⲩⲉⲓⲏ ⲉⲧ̅ⲣ̅ⲃⲗⲁⲡⲧⲓ ϩ̅ⲓ̅ⲧ̅ⲛ̅ <text:line-break/><text:span text:style-name="T1"> </text:span><text:span text:style-name="T2">(36/27) </text:span> ⲛ̅ⲧⲏⲟⲩ ⲙ̅ⲛ̅ ⲛ̅ⲇⲁⲓⲙⲱⲛ ⲛⲁⲓ̈ ⲉ‐ <text:line-break/><text:span text:style-name="T1"> </text:span><text:span text:style-name="T2">(36/28) </text:span> ⲧ̅ⲣ̅ⲫⲟⲣⲓ ⲛ̅ⲥⲁⲣ̅ⲝ̅ ⲉⲧ̅ⲣ̅ⲡⲗⲁⲛⲁ· <text:line-break/><text:span text:style-name="T1"> </text:span><text:span text:style-name="T2">(36/29) </text:span> ⲁⲩⲱ ⲥⲉⲙⲏⲣ ⲙ̅ⲛ̅ ⲡⲙⲟⲟⲩ· ⲛ̅‐ <text:line-break/><text:span text:style-name="T1"> </text:span><text:span text:style-name="T2">(36/30) </text:span> ⲧⲟϥ ⲇⲉ ϥⲛⲁⲣ̅ⲑⲉⲣⲁⲡⲉⲩⲉ ⲛ̅ⲑⲉ‐ <text:line-break/><text:span text:style-name="T1"> </text:span><text:span text:style-name="T2">(36/31) </text:span> ⲣⲁⲡⲓⲁ ⲛ̅ⲁⲣⲅⲟⲛ· ϥⲛⲁⲣ̅ⲡⲗⲁⲛⲁ <text:line-break/><text:span text:style-name="T1"> </text:span><text:span text:style-name="T2">(36/32) </text:span> ⲁⲩⲱ ϥⲛⲁⲙⲟⲩⲣ ⲙ̅ⲡⲕⲟⲥⲙⲟⲥ <text:line-break/><text:span text:style-name="T1"> </text:span><text:span text:style-name="T2">(36/33) </text:span> ⲁⲩⲱ ⲛⲉⲧ’ⲉⲓⲣⲉ ⲙ̅ⲡⲟⲩⲱϣ <text:line-break/><text:span text:style-name="T1"> </text:span><text:span text:style-name="T2">(36/34) </text:span> ⲛⲧⲫⲩⲥⲓⲥ̣ ⲧⲟⲩⲙⲉⲣⲓ̣ⲥ ⲛⲁ <text:line-break/><text:span text:style-name="T1"> </text:span><text:span text:style-name="T2">(36/35) </text:span> [.]..[.........]ⲉ[ <text:line-break/><text:span text:style-name="T1"> </text:span><text:span text:style-name="T2">(37/1) </text:span> ⲛ̅ⲥⲟⲡ ⲥⲛⲁⲩ ϩ̅ⲙ̅ ⲡⲉϩⲟⲟⲩ ⲙ̅ⲡⲙⲟ‐ <text:line-break/><text:span text:style-name="T1"> </text:span><text:span text:style-name="T2">(37/2) </text:span> ⲟⲩ ⲙ̅ⲛ̅ ⲙ̅ⲙⲟⲣⲫⲏ ⲛ̅ⲧⲫⲩⲥⲓⲥ· <text:line-break/><text:span text:style-name="T1"> </text:span><text:span text:style-name="T2">(37/3) </text:span> ⲁⲩⲱ ⲥⲉⲛⲁϯ ⲛⲁⲩ ⲁⲛ· ϩⲟⲧⲁⲛ <text:line-break/><text:span text:style-name="T1"> </text:span><text:span text:style-name="T2">(37/4) </text:span> ⲉⲣϣⲁⲛⲧⲡⲓⲥⲧⲓⲥ ϣ̅ⲣ̅ϣⲱⲣⲟⲩ <text:line-break/><text:span text:style-name="T1"> </text:span><text:span text:style-name="T2">(37/5) </text:span> ⲉⲧⲣⲉⲥϫⲓ ⲉⲣⲟⲥ ⲙ̅ⲡⲇⲓⲕⲁⲓⲟⲥ <text:line-break/><text:span text:style-name="T1"> </text:span><text:span text:style-name="T2">(37/6) </text:span> ⲱ ⲥ̅ⲏ̅ⲉ̅ⲙ̅̓ ⲁⲛⲁⲅⲕⲏ ⲉⲧⲣⲉⲩⲙⲟⲩ‐ <text:line-break/><text:span text:style-name="T1"> </text:span><text:span text:style-name="T2">(37/7) </text:span> ⲧⲉ ⲉⲡⲙⲉⲉⲩⲉ ϩ̅ⲙ̅ ⲡⲗⲟⲅⲟⲥ ϫⲉ <text:line-break/><text:span text:style-name="T1"> </text:span><text:span text:style-name="T2">(37/8) </text:span> ⲕⲁⲁⲥ ⲉⲩⲛⲁⲛⲟⲩϩ̅ⲙ̅ ⲛ̅ⲧⲙ̅ⲣ̅ⲣⲉ ⲛ̅‐ <text:line-break/><text:span text:style-name="T1"> </text:span><text:span text:style-name="T2">(37/9) </text:span> ⲧⲇⲩⲛⲁⲙⲓⲥ ⲙ̅ⲡ̅ⲡ̅ⲛⲁ̅ ⲉⲡⲙⲟⲟⲩ <text:line-break/><text:span text:style-name="T1"> </text:span><text:span text:style-name="T2">(37/10) </text:span> ⲛ̅ϩ̅ⲣ̅ⲧⲉ· ⲟⲩⲙ̅ⲛⲧ’̅ⲙⲁⲕⲁⲣⲓⲟⲥ ⲇⲉ <text:line-break/><text:span text:style-name="T1"> </text:span><text:span text:style-name="T2">(37/11) </text:span> ⲧⲉ ⲉⲩϣⲁⲛϯ ⲛ̅ⲟⲩⲁ ⲉⲧⲣⲉϥⲙⲉ <text:line-break/><text:span text:style-name="T1"> </text:span><text:span text:style-name="T2">(37/12) </text:span> ⲉⲩⲉ ⲉⲡⲉⲧ’ϫⲟⲥⲉ· ⲁⲩⲱ ⲛ̅ϥ̅ <text:line-break/><text:span text:style-name="T1"> </text:span><text:span text:style-name="T2">(37/13) </text:span> ⲥⲟⲩⲱⲛ ⲡⲭⲣⲟⲛⲟⲥ ⲉⲧ’ϫⲟⲥⲉ <text:line-break/><text:span text:style-name="T1"> </text:span><text:span text:style-name="T2">(37/14) </text:span> ⲙ̅ⲛ̅ ⲧⲙ̅ⲣ̅ⲣⲉ· ⲡⲙⲟⲟⲩ ⲅⲁⲣ ⲟⲩ‐ <text:line-break/><text:span text:style-name="T1"> </text:span><text:span text:style-name="T2">(37/15) </text:span> ⲥⲱⲙⲁ ⲡⲉ ⲛ̅ⲉⲗⲁⲭⲓⲥⲧⲟⲛ· ⲁⲩⲱ <text:line-break/><text:span text:style-name="T1"> </text:span><text:span text:style-name="T2">(37/16) </text:span> ⲥⲉⲕⲱ ⲛ̅ⲛ̅ⲣⲱⲙⲉ ⲉⲃⲟⲗ ⲁⲛ ϫⲉ <text:line-break/><text:span text:style-name="T1"> </text:span><text:span text:style-name="T2">(37/17) </text:span> ⲥⲉⲙⲏⲣ ϩ̅ⲙ̅ ⲡⲙⲟⲟⲩ· ⲛ̅ⲑⲉ ϫⲓⲛ <text:line-break/><text:span text:style-name="T1"> </text:span><text:span text:style-name="T2">(37/18) </text:span> ⲛ̅ϣⲟⲣ̅ⲡ̅ ⲉϥⲙⲏⲣ ⲛ̅ϭⲓ ⲡⲟⲩⲟⲉⲓⲛ <text:line-break/><text:span text:style-name="T1"> </text:span><text:span text:style-name="T2">(37/19) </text:span> ⲙ̅ⲡ̅ⲡ̅ⲛⲁ̅ ⲱ ⲥ̅ⲏⲉⲙ̅· ⲥⲉⲣ̅ⲡⲗⲁⲛⲁⲥ <text:line-break/><text:span text:style-name="T1"> </text:span><text:span text:style-name="T2">(37/20) </text:span> ⲑⲁⲓ ⲉⲃⲟⲗ ϩ̅ⲛ̅ ϩⲁϩ ⲙ̅ⲙⲟⲣⲫⲏ ⲛ̅ⲧⲉ <text:line-break/><text:span text:style-name="T1"> </text:span><text:span text:style-name="T2">(37/21) </text:span> ⲛ̅ⲇⲁⲓⲙⲱⲛ· ⲉⲩⲙⲉⲉⲩⲉ ϫⲉ ϩ̅ⲙ̅ <text:line-break/><text:span text:style-name="T1"> </text:span><text:span text:style-name="T2">(37/22) </text:span> ⲡⲃⲁⲡⲧⲓⲥⲙⲟⲥ ⲛ̅ⲧⲁⲕⲁⲑⲁⲣⲥⲓⲁ <text:line-break/><text:span text:style-name="T1"> </text:span><text:span text:style-name="T2">(37/23) </text:span> ⲙ̅ⲡⲙⲟⲟⲩ ⲡⲉⲧϣⲟⲟⲡ ⲉⲧⲁ‐ <text:line-break/><text:span text:style-name="T1"> </text:span><text:span text:style-name="T2">(37/24) </text:span> ⲕ̅ⲙ̅ ⲉⲧ’ϭⲟⲟⲃ ⲉⲧⲟ ⲛ̅ⲁⲣⲅⲟⲛ <text:line-break/><text:span text:style-name="T1"> </text:span><text:span text:style-name="T2">(37/25) </text:span> ⲉⲧ’ϣⲟⲣϣ̅ⲣ̅· ϥⲛⲁϥⲓ ⲛ̅ⲛ̅ⲛⲟⲃⲉ <text:line-break/><text:span text:style-name="T1"> </text:span><text:span text:style-name="T2">(37/26) </text:span> ⲙ̅ⲙⲁⲩ· ⲁⲩⲱ ⲥⲉⲥⲟⲟⲩⲛ ⲁⲛ <text:line-break/><text:span text:style-name="T1"> </text:span><text:span text:style-name="T2">(37/27) </text:span> ϫⲉ ⲉⲃⲟⲗ ϩ̅ⲙ̅ ⲡⲙⲟⲟⲩ ⲉϩⲣⲁⲓ̈ ⲉ‐ <text:line-break/><text:span text:style-name="T1"> </text:span><text:span text:style-name="T2">(37/28) </text:span> ⲡⲙⲟⲟⲩ ⲉⲥϣⲟⲟⲡ ⲛ̅ϭⲓ ⲧⲙ̅ⲣ̅‐ <text:line-break/><text:span text:style-name="T1"> </text:span><text:span text:style-name="T2">(37/29) </text:span> ⲣⲉ ⲙ̅ⲛ̅ ⲧⲡⲗⲁⲛⲏ· ⲙ̅ⲛ̅ ⲧⲁⲕⲁ‐ <text:line-break/><text:span text:style-name="T1"> </text:span><text:span text:style-name="T2">(37/30) </text:span> ⲑⲁⲣⲥⲓⲁ· ⲡⲕⲱϩ ⲑⲁⲧⲃⲉ· ⲧⲙⲟⲓ‐ <text:line-break/><text:span text:style-name="T1"> </text:span><text:span text:style-name="T2">(37/31) </text:span> ⲭⲉⲓⲁ· ⲧⲙ̅ⲛ̅ⲧⲙ̅ⲛ̅ⲧⲣⲉ ⲛ̅ⲛⲟⲩϫ· <text:line-break/><text:span text:style-name="T1"> </text:span><text:span text:style-name="T2">(37/32) </text:span> ϩⲉⲛϩⲉⲣⲉⲥⲓⲥ· ϩⲉⲛⲧⲱⲣ̅ⲡ̅· ϩⲉⲛ <text:line-break/><text:span text:style-name="T1"> </text:span><text:span text:style-name="T2">(37/33) </text:span> ⲉⲡⲓⲑⲩⲙⲓⲁ· ϩⲉⲛⲙ̅ⲛ̅ⲧ̅ϩⲁϩ ⲛ̅‐ <text:line-break/><text:span text:style-name="T1"> </text:span><text:span text:style-name="T2">(37/34) </text:span> ϣⲁϫⲉ· ⲟⲩϭⲱⲛ̅ⲧ̅’̅ ⲟⲩⲥⲓϣⲉ̣ <text:line-break/><text:soft-page-break/><text:span text:style-name="T1"> </text:span><text:span text:style-name="T2">(37/35) </text:span> ⲟ̣ⲩ̣ⲛⲟϭ [ <text:line-break/><text:span text:style-name="T1"> </text:span><text:span text:style-name="T2">(38/1) </text:span> ⲇⲓⲁⲧⲟⲩⲧⲟ ⲟⲩⲛ̅ ϩⲁϩ ⲙ̅ⲙⲟⲩ <text:line-break/><text:span text:style-name="T1"> </text:span><text:span text:style-name="T2">(38/2) </text:span> ϣⲟⲟⲡ· ⲛⲁⲓ̈ ⲉⲧ̅ⲣ̅ⲃⲁⲣⲓ ⲛ̅ⲛⲟⲩⲙⲉ <text:line-break/><text:span text:style-name="T1"> </text:span><text:span text:style-name="T2">(38/3) </text:span> ⲉⲩⲉ· ⲁⲛⲟⲕ ⲅⲁⲣ ϯϣ̅ⲣ̅ⲡ̅ ϫⲱ ⲙ̅‐ <text:line-break/><text:span text:style-name="T1"> </text:span><text:span text:style-name="T2">(38/4) </text:span> ⲙⲟⲥ ⲛ̅ⲛⲉⲧⲉ ⲟⲩⲛ̅ⲧⲟⲩ ϩⲏⲧ’ ⲙ̅‐ <text:line-break/><text:span text:style-name="T1"> </text:span><text:span text:style-name="T2">(38/5) </text:span> ⲙⲁⲩ· ⲥⲉⲛⲁⲗⲟ ϩ̅ⲙ̅ ⲡⲁⲕⲁⲑⲁⲣ‐ <text:line-break/><text:span text:style-name="T1"> </text:span><text:span text:style-name="T2">(38/6) </text:span> ⲧⲟⲛ ⲛ̅ⲃⲁⲡⲧⲓⲥⲙⲁ· ⲁⲩⲱ ⲛⲉⲧⲉⲩ‐ <text:line-break/><text:span text:style-name="T1"> </text:span><text:span text:style-name="T2">(38/7) </text:span> ⲛ̅ⲧⲟⲩ ϩⲏⲧ’ ⲙ̅ⲙⲁⲩ ⲉⲃⲟⲗ ϩ̅ⲙ̅ ⲡⲟⲩ‐ <text:line-break/><text:span text:style-name="T1"> </text:span><text:span text:style-name="T2">(38/8) </text:span> ⲟⲉⲓⲛ ⲙ̅ⲡ̅ⲡ̅ⲛⲁ̅· ⲥⲉⲛⲁⲣ̅ⲕⲟⲓⲛⲱ <text:line-break/><text:span text:style-name="T1"> </text:span><text:span text:style-name="T2">(38/9) </text:span> ⲛⲓ ⲁⲛ ⲙ̅ⲛ̅ ⲧ̅’ⲧⲣⲓⲃⲏ ⲛ̅ⲁⲕⲁⲑⲁⲣⲧⲟⲛ· <text:line-break/><text:span text:style-name="T1"> </text:span><text:span text:style-name="T2">(38/10) </text:span> ⲁⲩⲱ ⲡⲟⲩϩⲏⲧ’ ⲛⲁϩⲱⲕ̅ⲙ̅ ⲁⲛ· <text:line-break/><text:span text:style-name="T1"> </text:span><text:span text:style-name="T2">(38/11) </text:span> ⲟⲩⲇⲉ ⲥⲉⲛⲁⲥϩⲟⲩⲱⲣⲟⲩ ⲁⲛ· <text:line-break/><text:span text:style-name="T1"> </text:span><text:span text:style-name="T2">(38/12) </text:span> ⲁⲩⲱ ⲡⲙⲟⲟⲩ 〈ⲟⲩ〉ⲇⲉ ⲥⲉⲛⲁϯ ⲛⲁⲩ <text:line-break/><text:span text:style-name="T1"> </text:span><text:span text:style-name="T2">(38/13) </text:span> ⲉⲟⲟⲩ ⲁⲛ· ⲡⲙⲁ ⲉⲧ̅ϥ̅ⲙ̅ⲙⲁⲩ ⲛ̅‐ <text:line-break/><text:span text:style-name="T1"> </text:span><text:span text:style-name="T2">(38/14) </text:span> ϭⲓ ⲡⲥⲁϩⲟⲩ ⲉϥⲙ̅ⲙⲁⲩ ⲛ̅ϭⲓ ⲡϣⲧⲁ· <text:line-break/><text:span text:style-name="T1"> </text:span><text:span text:style-name="T2">(38/15) </text:span> ⲁⲩⲱ ⲧⲙ̅ⲛ̅ⲧ̅’̅ⲃ̅ⲗ̅ⲗⲉ· ⲡⲙⲁ ⲉⲧ̅ϥ̅‐ <text:line-break/><text:span text:style-name="T1"> </text:span><text:span text:style-name="T2">(38/16) </text:span> ⲙ̅ⲙⲁⲩ ⲛ̅ϭⲓ ⲡⲉⲟⲟⲩ ⲉⲥⲙ̅ⲙⲁⲩ <text:line-break/><text:span text:style-name="T1"> </text:span><text:span text:style-name="T2">(38/17) </text:span> ⲉⲩϣⲁⲛⲧⲱϩ ⲅⲁⲣ ⲙ̅ⲛ̅ ⲛ̅ⲕⲁⲕⲟⲥ <text:line-break/><text:span text:style-name="T1"> </text:span><text:span text:style-name="T2">(38/18) </text:span> ⲥⲉϣⲟⲩⲉⲓⲧ’ ϩ̅ⲙ̅ ⲡⲙⲟⲟⲩ ⲛ̅ⲕⲁ‐ <text:line-break/><text:span text:style-name="T1"> </text:span><text:span text:style-name="T2">(38/19) </text:span> ⲕⲉ· ⲡⲙⲁ ⲅⲁⲣ ⲛ̅ⲧⲁⲩⲣ̅ⲟⲛⲟⲙⲁ‐ <text:line-break/><text:span text:style-name="T1"> </text:span><text:span text:style-name="T2">(38/20) </text:span> ⲍⲉ ⲙ̅ⲡⲙⲟⲟⲩ ⲙ̅ⲙⲁⲩ ⲉⲧ’ⲫⲩ‐ <text:line-break/><text:span text:style-name="T1"> </text:span><text:span text:style-name="T2">(38/21) </text:span> ⲥⲓⲥ ⲙ̅ⲙⲁⲩ ⲙ̅ⲛ̅ ⲡⲁⲛⲁϣ· ⲙ̅ⲛ̅ <text:line-break/><text:span text:style-name="T1"> </text:span><text:span text:style-name="T2">(38/22) </text:span> ⲡϭⲟⲗ̓ ⲙ̅ⲛ̅ ⲡⲟⲥⲉ· ⲙⲟⲛⲟⲛ ⲅⲁⲣ <text:line-break/><text:span text:style-name="T1"> </text:span><text:span text:style-name="T2">(38/23) </text:span> ϩ̅ⲙ̅ ⲡ̅ⲛⲁ̅ ⲛ̅ⲁⲅⲉⲛⲛⲏⲧⲟⲛ· ⲡⲙⲁ <text:line-break/><text:span text:style-name="T1"> </text:span><text:span text:style-name="T2">(38/24) </text:span> ⲛ̅ⲧⲁϥⲙ̅ⲧⲟⲛ ⲙ̅ⲙⲟϥ ⲛ̅ϭⲓ ⲡⲟⲩ‐ <text:line-break/><text:span text:style-name="T1"> </text:span><text:span text:style-name="T2">(38/25) </text:span> ⲟⲉⲓⲛ ⲉⲧ’ϫⲟⲥⲉ· ⲙ̅ⲡⲟⲩⲣ̅ⲟ‐ <text:line-break/><text:span text:style-name="T1"> </text:span><text:span text:style-name="T2">(38/26) </text:span> ⲛⲟⲙⲁⲍⲉ ⲙ̅ⲡⲙⲟⲟⲩ ⲙ̅ⲙⲁⲩ· <text:line-break/><text:span text:style-name="T1"> </text:span><text:span text:style-name="T2">(38/27) </text:span> ⲁⲩⲱ ⲥⲉⲛⲁϣ̅ⲣ̅ⲟⲙⲟⲙⲁⲍⲉ <text:line-break/><text:span text:style-name="T1"> </text:span><text:span text:style-name="T2">(38/28) </text:span> ⲙ̅ⲙⲟϥ ⲁⲛ· ⲡⲁⲓ̈ ⲅⲁⲣ ⲡⲉ ⲡⲁⲟⲩ‐ <text:line-break/><text:span text:style-name="T1"> </text:span><text:span text:style-name="T2">(38/29) </text:span> ⲱⲛ̅ϩ̅ ⲉⲃⲟⲗ· ϩⲟⲧⲁⲛ ⲅⲁⲣ ⲉⲉⲓ‐ <text:line-break/><text:span text:style-name="T1"> </text:span><text:span text:style-name="T2">(38/30) </text:span> ϣⲁⲛϫⲱⲕ ⲉⲃⲟⲗ ⲛ̅ⲛ̅ⲭⲣⲟⲛⲟⲥ <text:line-break/><text:span text:style-name="T1"> </text:span><text:span text:style-name="T2">(38/31) </text:span> ⲉⲧⲏⲡ ⲛⲁⲓ̈ ϩ̅ⲓ̅ϫ̅ⲙ̅ ⲡⲕⲁϩ· ⲧⲟⲧⲉ <text:line-break/><text:span text:style-name="T1"> </text:span><text:span text:style-name="T2">(38/32) </text:span> ϯ[ⲛ]ⲁⲛⲟⲩϫⲉ ⲉⲃⲟⲗ ⲙ̅ⲙⲟⲉⲓ ⲛ̅‐ <text:line-break/><text:span text:style-name="T1"> </text:span><text:span text:style-name="T2">(38/33) </text:span> [.].ⲉ̣...[.....ⲁ]ⲩⲱ ⲥ̣ⲛ̣ⲁ̣ <text:line-break/><text:span text:style-name="T1"> </text:span><text:span text:style-name="T2">(39/1) </text:span> ⲡⲓⲣⲉ ⲉϩⲣⲁⲓ̈ ⲉϫⲱⲓ̈ ⲛ̅ϭⲓ ⲧⲁϩ̅ⲃ̅‐ <text:line-break/><text:span text:style-name="T1"> </text:span><text:span text:style-name="T2">(39/2) </text:span> ⲥⲱ ⲉⲧⲉ ⲙ̅ⲙ̅ⲛ̅ⲧⲉⲥ ⲥⲁⲉⲓϣ· <text:line-break/><text:span text:style-name="T1"> </text:span><text:span text:style-name="T2">(39/3) </text:span> ⲁⲩⲱ ⲛⲁⲕⲉϩ̅ⲃ̅ⲥⲱ ⲧⲏⲣⲟⲩ ⲛ̅ⲧⲁⲓ̈ <text:line-break/><text:span text:style-name="T1"> </text:span><text:span text:style-name="T2">(39/4) </text:span> ⲧⲁⲁⲩ ϩ̅ⲓ̅ⲱⲱⲧ’ ϩ̅ⲛ̅ ⲛ̅ⲕⲗⲟⲟⲗⲉ <text:line-break/><text:span text:style-name="T1"> </text:span><text:span text:style-name="T2">(39/5) </text:span> ⲧⲏⲣⲟⲩ ⲛⲁⲓ̈ ⲛⲉⲩϣⲟⲟⲡ ⲉⲃⲟⲗ <text:line-break/><text:span text:style-name="T1"> </text:span><text:span text:style-name="T2">(39/6) </text:span> ϩ̅ⲙ̅ ⲡⲑⲁⲩⲙⲁ ⲙ̅ⲡ̅ⲡ̅ⲛⲁ̅· ⲡⲁⲏⲣ <text:line-break/><text:span text:style-name="T1"> </text:span><text:span text:style-name="T2">(39/7) </text:span> ⲅⲁⲣ ⲛⲁⲡⲱϩ ⲉⲃⲟⲗ ⲛ̅ⲧⲁϩ̅ⲃ̅ⲥⲱ· <text:line-break/><text:span text:style-name="T1"> </text:span><text:span text:style-name="T2">(39/8) </text:span> ⲥⲛⲁⲣ̅ⲟⲩⲟⲉⲓⲛ ⲅⲁⲣ ⲛ̅ⲥ̅ⲡⲱϩ ⲛ̅‐ <text:line-break/><text:span text:style-name="T1"> </text:span><text:span text:style-name="T2">(39/9) </text:span> ⲛ̅ⲕⲗⲟⲟⲗⲉ ⲧⲏⲣⲟⲩ ϣⲁ ϩⲣⲁⲓ̈ ⲉ‐ <text:line-break/><text:span text:style-name="T1"> </text:span><text:span text:style-name="T2">(39/10) </text:span> ⲧⲛⲟⲩⲛⲉ ⲙ̅ⲡⲟⲩⲟⲉⲓⲛ· ⲡⲛⲟⲩⲥ <text:line-break/><text:span text:style-name="T1"> </text:span><text:span text:style-name="T2">(39/11) </text:span> ⲡⲉ ⲧⲁⲛⲁⲡⲁⲩⲥⲓⲥ ⲙ̅ⲛ̅ ⲧⲁϩ̅ⲃ̅ⲥⲱ· <text:line-break/><text:span text:style-name="T1"> </text:span><text:span text:style-name="T2">(39/12) </text:span> ⲁⲩⲱ ⲡⲁⲕⲉⲥⲉⲉⲡⲉ ⲛ̅ϩ̅ⲃ̅ⲥⲱ <text:line-break/><text:span text:style-name="T1"> </text:span><text:span text:style-name="T2">(39/13) </text:span> ⲛⲉⲧ’ϩ̅ⲓ̅ϭⲃⲟⲩⲣ ⲙ̅ⲛ̅ ⲛⲉⲧ’ϩ̅ⲓ̅ⲟⲩ <text:line-break/><text:soft-page-break/><text:span text:style-name="T1"> </text:span><text:span text:style-name="T2">(39/14) </text:span> ⲛⲁⲙ· ⲁⲩⲱ ⲥⲉⲛⲁⲣ̅ⲟⲩⲟⲉⲓⲛ <text:line-break/><text:span text:style-name="T1"> </text:span><text:span text:style-name="T2">(39/15) </text:span> ϩ̅ⲓ̅ⲡⲁϩⲟⲩ·ϫⲉⲕⲁⲁⲥ ⲉϥⲛⲁⲟⲩ‐ <text:line-break/><text:span text:style-name="T1"> </text:span><text:span text:style-name="T2">(39/16) </text:span> ⲱⲛ̅ϩ̅ ⲉⲃⲟⲗ ⲛ̅ϭⲓ ⲡⲓⲛⲉ ⲙ̅ⲡⲟⲩ‐ <text:line-break/><text:span text:style-name="T1"> </text:span><text:span text:style-name="T2">(39/17) </text:span> ⲟⲉⲓⲛ· ⲛⲁϩⲃⲥⲱ ⲅⲁⲣ ⲛ̅ⲧⲁⲓ̈ⲧⲁ <text:line-break/><text:span text:style-name="T1"> </text:span><text:span text:style-name="T2">(39/18) </text:span> ⲁⲩ ϩ̅ⲓ̅ⲱⲱⲧ’ ϩ̅ⲛ̅ ⲧϣⲟⲙⲧⲉ ⲛ̅‐ <text:line-break/><text:span text:style-name="T1"> </text:span><text:span text:style-name="T2">(39/19) </text:span> ⲕⲗⲟⲟⲗⲉ ϩ̅ⲙ̅ ⲫⲁⲉ ⲛ̅ϩⲟⲟⲩ ⲥⲉ‐ <text:line-break/><text:span text:style-name="T1"> </text:span><text:span text:style-name="T2">(39/20) </text:span> ⲛⲁⲙ̅ⲧⲟⲛ ⲙ̅ⲙⲟⲟⲩ ϩ̅ⲛ̅ ⲧⲟⲩ <text:line-break/><text:span text:style-name="T1"> </text:span><text:span text:style-name="T2">(39/21) </text:span> ⲛⲟⲩⲛⲉ ⲉⲧⲉ ϩ̅ⲙ̅ ⲡ̅ⲛⲁ̅ ⲡⲉ ⲛ̅ⲁ‐ <text:line-break/><text:span text:style-name="T1"> </text:span><text:span text:style-name="T2">(39/22) </text:span> ⲅⲉⲛⲛⲏⲧⲟⲛ ⲉⲙ̅ⲛ̅ⲧⲁⲩ ⲙ̅ⲙⲁⲩ <text:line-break/><text:span text:style-name="T1"> </text:span><text:span text:style-name="T2">(39/23) </text:span> ⲙ̅ⲡϣⲧⲁ· ⲉⲃⲟⲗ ϩ̅ⲙ̅ ⲡ̅ⲡⲱϣⲉ ⲛ̅‐ <text:line-break/><text:span text:style-name="T1"> </text:span><text:span text:style-name="T2">(39/24) </text:span> ⲕⲗⲟⲟⲗⲉ· ⲉⲧⲃⲉⲡⲁⲓ̈ ⲁⲉⲓⲟⲩⲱⲛ̅ϩ̅ <text:line-break/><text:span text:style-name="T1"> </text:span><text:span text:style-name="T2">(39/25) </text:span> ⲉⲃⲟⲗ ⲉⲓ̈ⲟ ⲛ̅ⲛⲁⲧ’ϣⲧⲁ ⲉⲧⲃⲉ ⲛ̅‐ <text:line-break/><text:span text:style-name="T1"> </text:span><text:span text:style-name="T2">(39/26) </text:span> ⲕⲗⲟⲟⲗⲉ ϫⲉ ⲥⲉϣⲏϣ ⲁⲛ· ϣⲓ‐ <text:line-break/><text:span text:style-name="T1"> </text:span><text:span text:style-name="T2">(39/27) </text:span> ⲛⲁ ⲉⲥⲛⲁϫⲱⲕ ⲉⲃⲟⲗ ⲛ̅ϭⲓ ⲧⲕⲁ‐ <text:line-break/><text:span text:style-name="T1"> </text:span><text:span text:style-name="T2">(39/28) </text:span> ϭⲓⲁ ⲛ̅ⲧⲫⲩⲥⲓⲥ· ⲛⲉⲥⲟⲩⲱϣ <text:line-break/><text:span text:style-name="T1"> </text:span><text:span text:style-name="T2">(39/29) </text:span> ⲅⲁⲣ ⲡⲉ ϩ̅ⲙ̅ ⲡⲕⲁⲓⲣⲟⲥ ⲉⲧ̅ⲙ̅ⲙⲁⲩ <text:line-break/><text:span text:style-name="T1"> </text:span><text:span text:style-name="T2">(39/30) </text:span> ⲉϭⲱⲣ̅ϭ̅ ⲉⲣⲟⲉⲓ· ⲛⲉⲥⲁⲣ̅ⲡⲏⲥ <text:line-break/><text:span text:style-name="T1"> </text:span><text:span text:style-name="T2">(39/31) </text:span> ⲥⲉ ⲛ̅ⲥⲟⲗⲇⲁⲛ ⲉⲧⲉⲡϣⲁϩ ⲛ̅‐ <text:line-break/><text:span text:style-name="T1"> </text:span><text:span text:style-name="T2">(39/32) </text:span> ⲕⲁⲕⲉ ⲡⲉ· ⲡⲁⲓ̈ ⲛ̅ⲧⲁϥⲁϩⲉⲣⲁ <text:line-break/><text:span text:style-name="T1"> </text:span><text:span text:style-name="T2">(39/33) </text:span> ⲧ̅ϥ̅ ⲉⲡϫ[..]ⲉ̣[..] ⲛ̣̅ⲧ’̣̅ⲡⲗⲁ̣ⲛ̣ⲏ· <text:line-break/><text:span text:style-name="T1"> </text:span><text:span text:style-name="T2">(40/1) </text:span> ϫⲉⲕⲁⲁⲥ ⲉϥⲛⲁϭⲱⲣ̅ϭ̅ ⲉⲣⲟⲉⲓ· <text:line-break/><text:span text:style-name="T1"> </text:span><text:span text:style-name="T2">(40/2) </text:span> ⲁⲥⲣ̅ⲙⲉⲗⲉⲧⲁ ⲛ̅ⲧⲉⲥⲡⲓⲥⲧⲓⲥ <text:line-break/><text:span text:style-name="T1"> </text:span><text:span text:style-name="T2">(40/3) </text:span> ⲉⲥϩ̅ⲛ̅ ⲟⲩⲉⲟⲟⲩ ⲉϥϣⲟⲩⲉⲓⲧ’· <text:line-break/><text:span text:style-name="T1"> </text:span><text:span text:style-name="T2">(40/4) </text:span> ⲁⲩⲱ ϩ̅ⲙ̅ ⲡⲕⲉⲣⲟⲥ ⲉⲧ̅ⲙ̅ⲙⲁⲩ <text:line-break/><text:span text:style-name="T1"> </text:span><text:span text:style-name="T2">(40/5) </text:span> ⲛⲉⲣⲉⲡⲟⲩⲟⲉⲓⲛ ⲡⲉ ⲛⲁⲡⲱⲣ̅ϫ̅ <text:line-break/><text:span text:style-name="T1"> </text:span><text:span text:style-name="T2">(40/6) </text:span> ⲉⲡⲕⲁⲕⲉ· ⲁⲩⲱ ⲛ̅ⲥⲉⲥⲱⲧ̅ⲙ̅ <text:line-break/><text:span text:style-name="T1"> </text:span><text:span text:style-name="T2">(40/7) </text:span> ⲉⲩⲥⲙⲏ ϩ̅ⲛ̅ ⲧⲕⲧⲓⲥⲓⲥ ⲉⲥϫⲱ <text:line-break/><text:span text:style-name="T1"> </text:span><text:span text:style-name="T2">(40/8) </text:span> ⲙ̅ⲙⲟⲥ ϫⲉ ⲛⲁⲓ̈ⲁⲧ̅ϥ̅ ⲙ̅ⲡⲃⲁⲗ ⲉⲣ‐ <text:line-break/><text:span text:style-name="T1"> </text:span><text:span text:style-name="T2">(40/9) </text:span> ⲛⲁⲩ ⲉⲣⲟⲕ· ⲁⲩⲱ ⲡⲛⲟⲩⲥ ⲉⲣ‐ <text:line-break/><text:span text:style-name="T1"> </text:span><text:span text:style-name="T2">(40/10) </text:span> ϥⲓ ⲉϩⲣⲁⲓ̈ ϩⲁ ⲡⲉⲕⲙⲉⲅⲉⲑⲟⲥ ϩ̅ⲙ̅ <text:line-break/><text:span text:style-name="T1"> </text:span><text:span text:style-name="T2">(40/11) </text:span> ⲡⲁⲟⲩⲱϣ· ⲥⲉⲛⲁϫⲟⲟⲥ ⲉⲃⲟⲗ <text:line-break/><text:span text:style-name="T1"> </text:span><text:span text:style-name="T2">(40/12) </text:span> ϩ̅ⲙ̅ ⲡⲉⲧϫⲟⲥⲉ ϫⲉ ⲛⲁⲓ̈ⲁⲧ̅ⲥ̅ ⲛ̅‐ <text:line-break/><text:span text:style-name="T1"> </text:span><text:span text:style-name="T2">(40/13) </text:span> ⲣⲉⲃⲟⲩⲏⲗ ⲉⲃⲟⲗ ϩ̅ⲛ̅ ⲅⲉⲛⲟⲥ ⲛⲓⲙ <text:line-break/><text:span text:style-name="T1"> </text:span><text:span text:style-name="T2">(40/14) </text:span> ⲛ̅ⲛ̅ⲣⲱⲙⲉ· ϫⲉ ⲛ̅ⲧⲟ ⲟⲩⲁⲁⲧⲉ <text:line-break/><text:span text:style-name="T1"> </text:span><text:span text:style-name="T2">(40/15) </text:span> ⲡⲉⲣⲛⲁⲩ· ⲁⲩⲱ ⲉⲥⲁⲥⲱⲧ̅ⲙ̅· ⲁⲩ‐ <text:line-break/><text:span text:style-name="T1"> </text:span><text:span text:style-name="T2">(40/16) </text:span> ⲱ ⲥⲉⲛⲁϥⲓ ⲛ̅ⲧⲁⲡⲉ ⲛ̅ⲧ̅ⲥϩ̅ⲓ̅ⲙⲉ· <text:line-break/><text:span text:style-name="T1"> </text:span><text:span text:style-name="T2">(40/17) </text:span> ⲧⲁⲓ̈ ⲉⲧⲉⲩⲛ̅ⲧⲁⲥ ⲙ̅ⲙⲁⲩ ⲛ̅ⲧⲉⲥ <text:line-break/><text:span text:style-name="T1"> </text:span><text:span text:style-name="T2">(40/18) </text:span> ⲑⲏⲥⲓⲥ· ⲧⲁⲓ̈ ⲉⲧ̅ⲕ̅ⲛⲁⲟⲩⲟⲛϩ̅ⲥ̅ ⲉ‐ <text:line-break/><text:span text:style-name="T1"> </text:span><text:span text:style-name="T2">(40/19) </text:span> ⲃⲟⲗ ϩ̅ⲓ̅ϫ̅ⲙ̅ ⲡⲕⲁϩ· ⲁⲩⲱ ⲕⲁⲧⲁ <text:line-break/><text:span text:style-name="T1"> </text:span><text:span text:style-name="T2">(40/20) </text:span> ⲡⲁⲟⲩⲱϣ ⲥⲛⲁⲣ̅ⲙⲁⲣⲧⲩⲣⲓ ⲛ̅ⲥ̅‐ <text:line-break/><text:span text:style-name="T1"> </text:span><text:span text:style-name="T2">(40/21) </text:span> ⲙ̅ⲧⲟⲛ ⲙ̅ⲙⲟⲥ ⲉⲃⲟⲗ ϩ̅ⲛ̅ ϩ̅ⲓ̅ⲥⲉ <text:line-break/><text:span text:style-name="T1"> </text:span><text:span text:style-name="T2">(40/22) </text:span> ⲛⲓⲙ ⲉϥϣⲟⲩⲉⲓⲧ’ ⲛ̅ⲧⲉ ⲧⲫⲩ‐ <text:line-break/><text:span text:style-name="T1"> </text:span><text:span text:style-name="T2">(40/23) </text:span> ⲥⲓⲥ ⲙ̅ⲛ̅ ⲡⲭⲁⲟⲥ· ⲧⲉⲥϩ̅ⲓ̅ⲙⲉ ⲅⲁⲣ <text:line-break/><text:span text:style-name="T1"> </text:span><text:span text:style-name="T2">(40/24) </text:span> ⲉⲧⲟⲩⲛⲁϥⲓ ⲧⲉⲥⲁⲡⲉ ϩ̅ⲙ̅ ⲡⲕⲉ‐ <text:line-break/><text:span text:style-name="T1"> </text:span><text:span text:style-name="T2">(40/25) </text:span> ⲣⲟⲥ ⲉⲧ̅ⲙ̅ⲙⲁⲩ· ⲧⲥⲩⲥⲧⲁⲥⲓⲥ <text:line-break/><text:span text:style-name="T1"> </text:span><text:span text:style-name="T2">(40/26) </text:span> ⲧⲉ ⲛ̅ⲧⲇⲩⲛⲁⲙⲓⲥ ⲙ̅ⲡⲇⲁⲓⲙⲱⲛ· <text:line-break/><text:span text:style-name="T1"> </text:span><text:span text:style-name="T2">(40/27) </text:span> ⲡⲁⲓ̈ ⲉⲧⲛⲁⲣ̅ⲃⲁⲡⲧⲓⲍⲉ ⲙ̅ⲡ̅ⲥⲡⲉⲣ <text:line-break/><text:soft-page-break/><text:span text:style-name="T1"> </text:span><text:span text:style-name="T2">(40/28) </text:span> ⲙⲁ ⲛ̅ⲕⲁⲕⲉ· ϩ̅ⲛ̅ ⲧⲙ̅ⲛⲧ’̅ⲥⲕⲗⲏⲣⲟⲥ <text:line-break/><text:span text:style-name="T1"> </text:span><text:span text:style-name="T2">(40/29) </text:span> ⲉⲧⲣⲉϥⲧⲱϩ ⲙ̅ⲛ̅ ⲧⲁⲕⲁⲑⲁⲣⲥⲓⲁ· <text:line-break/><text:span text:style-name="T1"> </text:span><text:span text:style-name="T2">(40/30) </text:span> ⲁϥϫⲡⲟ ⲛ̅ⲟⲩⲥϩ̅ⲓ̅ⲙⲉ ⲁⲩⲙⲟⲩ <text:line-break/><text:span text:style-name="T1"> </text:span><text:span text:style-name="T2">(40/31) </text:span> ⲧⲉ ⲉⲣⲟⲥ ϫⲉ ⲣⲉⲃⲟⲩⲏⲗ· ⲁⲛⲁⲩ <text:line-break/><text:span text:style-name="T1"> </text:span><text:span text:style-name="T2">(40/32) </text:span> ⲱ̅ ⲥ̅ⲏ̅ⲉ̅ⲙ̅̓ ⲉⲛⲉⲛ̅ⲧⲁⲉⲓϫⲟⲟⲩ <text:line-break/><text:span text:style-name="T1"> </text:span><text:span text:style-name="T2">(40/33) </text:span> ⲛⲁⲕ ⲧⲏⲣⲟⲩ ϫⲉ ⲁⲩϫⲱⲕ ⲉⲃⲟⲗ· <text:line-break/><text:span text:style-name="T1"> </text:span><text:span text:style-name="T2">(40/34) </text:span> [ⲁ]ⲩⲱ̣[.....ⲱ̣[. ⲁ]ⲩⲱ̣ ⲛ̣ⲉ[5̅0̅ⲧ̅]̅ⲕ̣̅̅50 <text:line-break/><text:span text:style-name="T1"> </text:span><text:span text:style-name="T2">(41/1) </text:span> ϣⲁⲁⲧ’ ⲙ̅ⲙⲟⲟⲩ· ⲕⲁⲧⲁ ⲡⲁⲟⲩ‐ <text:line-break/><text:span text:style-name="T1"> </text:span><text:span text:style-name="T2">(41/2) </text:span> ⲱϣ ⲥⲉⲛⲁⲟⲩⲱⲛ̅ϩ̅ ⲉⲃⲟⲗ ⲛⲁⲕ <text:line-break/><text:span text:style-name="T1"> </text:span><text:span text:style-name="T2">(41/3) </text:span> ⲙ̅ⲡⲙⲁ ⲉⲧ̅ⲙ̅ⲙⲁⲩ ϩ̅ⲓ̅ϫ̅ⲙ̅ ⲡⲕⲁϩ· <text:line-break/><text:span text:style-name="T1"> </text:span><text:span text:style-name="T2">(41/4) </text:span> ϫⲉⲕⲁⲁⲥ ⲉⲕⲛⲁϭⲟⲗⲡⲟⲩ ⲉⲃⲟⲗ <text:line-break/><text:span text:style-name="T1"> </text:span><text:span text:style-name="T2">(41/5) </text:span> ⲛ̅ⲑⲉ ⲉⲧⲟⲩϣⲟⲟⲡ ⲙ̅ⲙⲟⲥ· ⲙ̅‐ <text:line-break/><text:span text:style-name="T1"> </text:span><text:span text:style-name="T2">(41/6) </text:span> ⲡ̅ⲣ̅ⲧⲣⲉⲡⲉⲕⲙⲉⲉⲩⲉ ⲣ̅ⲕⲟⲓⲛⲱ‐ <text:line-break/><text:span text:style-name="T1"> </text:span><text:span text:style-name="T2">(41/7) </text:span> ⲛⲓ ⲙ̅ⲛ̅ ⲡⲥⲱⲙⲁ· ⲛ̅ⲧⲁⲉⲓϫⲉ ⲛⲁⲓ̈ <text:line-break/><text:span text:style-name="T1"> </text:span><text:span text:style-name="T2">(41/8) </text:span> ⲅⲁⲣ ⲛⲁⲕ ϩ̅ⲓ̅ⲧ̅ⲙ̅ ⲡϩⲣⲟⲟⲩ ⲙ̅ⲡⲕⲱ‐ <text:line-break/><text:span text:style-name="T1"> </text:span><text:span text:style-name="T2">(41/9) </text:span> ϩ̅ⲧ̅’̅· ϫⲉ ⲁⲉⲓⲃⲱⲕ ⲉϩⲟⲩⲛ ϩ̅ⲓ̅ⲧ̅ⲛ̅ <text:line-break/><text:span text:style-name="T1"> </text:span><text:span text:style-name="T2">(41/10) </text:span> ⲧⲙⲏⲧⲉ ⲛ̅ⲛ̅ⲕⲗⲟⲟⲗⲉ· ⲁⲩⲱ ⲁⲉⲓ <text:line-break/><text:span text:style-name="T1"> </text:span><text:span text:style-name="T2">(41/11) </text:span> ϣⲁϫⲉ ⲕⲁⲧⲁ ⲧⲁⲥⲡⲉ ⲙ̅ⲡⲟⲩⲁ ⲡⲟⲩⲁ· <text:line-break/><text:span text:style-name="T1"> </text:span><text:span text:style-name="T2">(41/12) </text:span> ⲧⲁⲓ̈ ⲧⲉ ⲧⲁⲁⲥⲡⲉ ⲛ̅ⲧⲁⲉⲓϫⲟⲟⲥ ⲛⲁⲕ <text:line-break/><text:span text:style-name="T1"> </text:span><text:span text:style-name="T2">(41/13) </text:span> ⲁⲩⲱ ⲥⲉⲛⲁϥⲓⲧ̅ⲥ̅ ⲛ̅ⲧⲟⲟⲧ̅ⲕ̅· ⲁⲩⲱ <text:line-break/><text:span text:style-name="T1"> </text:span><text:span text:style-name="T2">(41/14) </text:span> ⲕⲛⲁϣⲁϫⲉ ϩ̅ⲙ̅ ⲡϩⲣⲟⲟⲩ ⲙ̅ⲡⲕⲟⲥ‐ <text:line-break/><text:span text:style-name="T1"> </text:span><text:span text:style-name="T2">(41/15) </text:span> ⲙⲟⲥ ϩ̅ⲓ̅ϫ̅ⲙ̅ ⲡⲕⲁϩ· ⲁⲩⲱ ϥⲛⲁⲟⲩ‐ <text:line-break/><text:span text:style-name="T1"> </text:span><text:span text:style-name="T2">(41/16) </text:span> ⲱⲛ̅ϩ̅ ⲉⲃⲟⲗ ⲛⲁⲕ ϩ̅ⲙ̅ ⲡⲣⲟⲥⲱⲡⲟⲛ <text:line-break/><text:span text:style-name="T1"> </text:span><text:span text:style-name="T2">(41/17) </text:span> ⲉⲧ̅ⲙ̅ⲙⲁⲩ ⲙ̅ⲛ̅ ⲡϩⲣⲟⲟⲩ· ⲁⲩⲱ <text:line-break/><text:span text:style-name="T1"> </text:span><text:span text:style-name="T2">(41/18) </text:span> ⲛⲉⲛⲧⲁⲉⲓϫⲟⲟⲩ ⲧⲏⲣⲟⲩ ⲛⲁⲕ ϫⲓⲛ <text:line-break/><text:span text:style-name="T1"> </text:span><text:span text:style-name="T2">(41/19) </text:span> ⲡⲓⲛⲁⲩ ⲙⲟⲟϣⲉ ⲙ̅ⲛ̅ ⲧⲡⲓⲥⲧⲓⲥ· <text:line-break/><text:span text:style-name="T1"> </text:span><text:span text:style-name="T2">(41/20) </text:span> ⲉⲣ̅ⲟⲩⲟⲉⲓⲛ ϩ̅ⲛ̅ ⲛ̅ⲃⲁⲑⲟⲥ ⲛ̅ⲧⲕⲧⲓ{ⲥ} <text:line-break/><text:span text:style-name="T1"> </text:span><text:span text:style-name="T2">(41/21) </text:span> ⲓⲥ· ⲁⲛⲟⲕ ⲇⲉ ⲥⲏⲉⲙ· ⲁⲉⲓⲧⲱ‐ <text:line-break/><text:span text:style-name="T1"> </text:span><text:span text:style-name="T2">(41/22) </text:span> ⲱⲛ ϩⲱⲥ ⲉⲃⲟⲗ ϩ̅ⲛ̅ ⲟⲩⲛⲟϭ ⲛ̅ϩ̅ⲓ̅‐ <text:line-break/><text:span text:style-name="T1"> </text:span><text:span text:style-name="T2">(41/23) </text:span> ⲛⲏⲃ· ⲁⲉⲓⲣ̅ ⲑⲁⲩⲙⲁ ⲛ̅ⲧⲁⲣⲓϫⲓ ⲙ̅ⲡ̅ <text:line-break/><text:span text:style-name="T1"> </text:span><text:span text:style-name="T2">(41/24) </text:span> ϫⲓⲛ ⲙ̅ⲡⲟⲩⲟⲉⲓⲛ ⲙ̅ⲛ̅ ⲡⲉϥⲙⲉⲉⲩⲉ <text:line-break/><text:span text:style-name="T1"> </text:span><text:span text:style-name="T2">(41/25) </text:span> ⲧⲏⲣ̅ϥ̅· ⲁⲩⲱ ⲁⲉⲓⲙⲟⲟϣⲉ ⲙ̅ⲛ̅ ⲧⲡⲓⲥ‐ <text:line-break/><text:span text:style-name="T1"> </text:span><text:span text:style-name="T2">(41/26) </text:span> ⲧⲓⲥ ⲉⲣ̅ⲟⲩⲟⲉⲓⲛ ⲛ̅ⲙ̅ⲙⲏⲉⲓ· ⲁⲩⲱ <text:line-break/><text:span text:style-name="T1"> </text:span><text:span text:style-name="T2">(41/27) </text:span> ⲁⲡⲇⲓⲕⲁⲓⲟⲥ ⲟⲩⲁϩ̅ϥ̅ ⲛ̅ⲥⲱⲛ ⲙ̅ⲛ̅ <text:line-break/><text:span text:style-name="T1"> </text:span><text:span text:style-name="T2">(41/28) </text:span> ⲧⲁϩ̅ⲃ̅ⲥⲱ ⲉⲙⲁⲩϫⲣⲟ ⲉⲣⲟⲥ· ⲁⲩ‐ <text:line-break/><text:span text:style-name="T1"> </text:span><text:span text:style-name="T2">(41/29) </text:span> ⲱ ⲛⲉⲛⲧⲁϥϫⲟⲟⲩ ⲧⲏⲣⲟⲩ ⲛⲁⲓ̈ <text:line-break/><text:span text:style-name="T1"> </text:span><text:span text:style-name="T2">(41/30) </text:span> ϫⲉ ⲥⲉⲛⲁϣⲱⲡⲉ ϩ̅ⲓ̅ϫ̅ⲙ̅ ⲡⲕⲁϩ <text:line-break/><text:span text:style-name="T1"> </text:span><text:span text:style-name="T2">(41/31) </text:span> ⲁⲩϣⲱⲡⲉ· ⲁⲩϯ ⲧⲫⲩⲥⲓⲥ ⲉ‐ <text:line-break/><text:span text:style-name="T1"> </text:span><text:span text:style-name="T2">(41/32) </text:span> ⲧ̅ⲛ̅ ⲧⲡⲓⲥⲧⲓⲥ ϣⲓⲛⲁ ⲉⲥⲛⲁϣ̅ⲣ̅ <text:line-break/><text:span text:style-name="T1"> </text:span><text:span text:style-name="T2">(41/33) </text:span> ϣⲱⲣ̅ⲥ̅ ⲛ̅ⲥ̅ⲁϩⲉⲣⲁⲧ̅ⲥ̅ ϩ̅ⲙ̅ ⲡⲕⲁⲕⲉ· <text:line-break/><text:span text:style-name="T1"> </text:span><text:span text:style-name="T2">(41/34) </text:span> ⲁ̣ⲥϫⲡⲟ 5̅0̅ⲛ̣̅̅[̅ⲧ̅50]ϩ̣ⲩⲙ̣ⲛⲏⲥ̣[ⲓ]ⲥ̣ ⲉⲥ‐ <text:line-break/><text:span text:style-name="T1"> </text:span><text:span text:style-name="T2">(42/1) </text:span> ⲛⲟⲩⲟⲩϩ ⲙ̅ⲙⲟⲥ ⲉⲥⲙⲟⲟϣⲉ̣ <text:line-break/><text:span text:style-name="T1"> </text:span><text:span text:style-name="T2">(42/2) </text:span> ⲛ̅ⲧⲟⲩϣⲏ ⲙ̅ⲛ̅ ⲡⲉϩⲟⲟⲩ· ⲉⲥ‐ <text:line-break/><text:span text:style-name="T1"> </text:span><text:span text:style-name="T2">(42/3) </text:span> ϫⲓ ⲁⲛⲁⲡⲁⲩⲥⲓⲥ ⲁⲛ ⲙ̅ⲛ̅ ⲙ̅ⲯⲩ‐ <text:line-break/><text:span text:style-name="T1"> </text:span><text:span text:style-name="T2">(42/4) </text:span> ⲭⲏ· ⲛⲁⲓ̈ ⲁⲩϫⲱⲕ ⲉⲃⲟⲗ ⲛ̅ⲛⲉⲥ‐ <text:line-break/><text:span text:style-name="T1"> </text:span><text:span text:style-name="T2">(42/5) </text:span> ϩⲃⲏⲩⲉ· ⲧⲟⲧⲉ ⲁⲛⲟⲕ ⲁⲉⲓⲣⲁ‐ <text:line-break/><text:span text:style-name="T1"> </text:span><text:span text:style-name="T2">(42/6) </text:span> ϣⲉ ϩ̅ⲙ̅ ⲡⲙⲉⲉⲩⲉ ⲙ̅ⲡⲟⲩⲟⲉⲓⲛ· <text:line-break/><text:soft-page-break/><text:span text:style-name="T1"> </text:span><text:span text:style-name="T2">(42/7) </text:span> ⲁⲓ̈ⲉ̅ⲓ̅ ⲉⲃⲟⲗ ϩ̅ⲙ̅ ⲡⲕⲁⲕⲉ ⲁⲉⲓⲙⲟ‐ <text:line-break/><text:span text:style-name="T1"> </text:span><text:span text:style-name="T2">(42/8) </text:span> ⲟϣⲉ ϩ̅ⲛ̅ ⲧⲡⲓⲥⲧⲓⲥ· ⲡⲙⲁ ⲉⲧⲟⲩ‐ <text:line-break/><text:span text:style-name="T1"> </text:span><text:span text:style-name="T2">(42/9) </text:span> ϣⲟⲟⲡ ⲙ̅ⲙⲁⲩ ⲛ̅ϭⲓ ⲙ̅ⲙⲟⲣⲫⲏ <text:line-break/><text:span text:style-name="T1"> </text:span><text:span text:style-name="T2">(42/10) </text:span> ⲛ̅ⲧⲫⲩⲥⲓⲥ ⲉϩⲣⲁⲓ̈ ⲉⲡϫⲓⲥⲉ ⲙ̅ⲡ̅ <text:line-break/><text:span text:style-name="T1"> </text:span><text:span text:style-name="T2">(42/11) </text:span> ⲕⲁϩ ⲁⲛⲉⲧ’ⲥ̅ⲃ̅ⲧⲱⲧ’· ⲧⲉⲕⲡⲓⲥ‐ <text:line-break/><text:span text:style-name="T1"> </text:span><text:span text:style-name="T2">(42/12) </text:span> ⲧⲓⲥ ϣⲟⲟⲡ ϩ̅ⲓ̅ϫ̅ⲙ̅ ⲡⲕⲁϩ ϩ̅ⲙ̅ ⲡⲉ‐ <text:line-break/><text:span text:style-name="T1"> </text:span><text:span text:style-name="T2">(42/13) </text:span> ϩⲟⲟⲩ ⲧⲏⲣ̅ϥ̅ ϩ̅ⲛ̅ ⲧⲟⲩϣⲏ ⲅⲁⲣ <text:line-break/><text:span text:style-name="T1"> </text:span><text:span text:style-name="T2">(42/14) </text:span> ⲧⲏⲣ̅ⲥ̅ ⲙ̅ⲛ̅ ⲡⲉϩⲟⲟⲩ ⲥⲕⲧⲟ ⲛ̅ⲧ’̅‐ <text:line-break/><text:span text:style-name="T1"> </text:span><text:span text:style-name="T2">(42/15) </text:span> ⲫⲩⲥⲓⲥ ϣⲓⲛⲁ ⲉⲥⲛⲁϫⲓ ⲉⲣⲟⲥ ⲙ̅‐ <text:line-break/><text:span text:style-name="T1"> </text:span><text:span text:style-name="T2">(42/16) </text:span> ⲡⲇⲓⲕⲁⲓⲟⲥ· ⲧⲫⲩⲥⲓⲥ ⲅⲁⲣ ϩⲁ ⲃⲁ‐ <text:line-break/><text:span text:style-name="T1"> </text:span><text:span text:style-name="T2">(42/17) </text:span> ⲣⲟⲥ ⲁⲩⲱ ⲥϣⲧ̅ⲣ̅ⲧⲱⲣ· ⲙ̅ⲙ̅ⲛ̅ <text:line-break/><text:span text:style-name="T1"> </text:span><text:span text:style-name="T2">(42/18) </text:span> ⲗⲁⲁⲩ ⲅⲁⲣ ⲛⲁϣⲟⲩⲱⲛ ⲁⲛⲙⲟⲣ‐ <text:line-break/><text:span text:style-name="T1"> </text:span><text:span text:style-name="T2">(42/19) </text:span> ⲫⲏ ⲙ̅ⲡⲣⲟ ⲉⲓⲙⲏⲧⲓ ⲁⲡⲛⲟⲩⲥ <text:line-break/><text:span text:style-name="T1"> </text:span><text:span text:style-name="T2">(42/20) </text:span> ⲙⲁⲩⲁⲁϥ· ⲡⲉⲓ̈ ⲛ̅ⲧⲁⲩⲛ̅ϩⲟⲩⲧ̅ϥ̅ <text:line-break/><text:span text:style-name="T1"> </text:span><text:span text:style-name="T2">(42/21) </text:span> ⲁⲡⲉⲩⲉⲓⲛⲉ· ⲟⲩϩ̅ⲣ̅ⲧⲉ ⲅⲁⲣ ⲡⲉ‐ <text:line-break/><text:span text:style-name="T1"> </text:span><text:span text:style-name="T2">(42/22) </text:span> ⲡⲟⲩⲉⲓⲛⲉ ⲛ̅ⲧⲙⲟⲣⲫⲏ ⲥ̅ⲛ̅ⲧⲉ <text:line-break/><text:span text:style-name="T1"> </text:span><text:span text:style-name="T2">(42/23) </text:span> ⲛ̅ⲧⲉ ⲧⲫⲩⲥⲓⲥ ⲡⲉⲧⲟ ⲛ̅ⲃ̅ⲗ̅ⲗⲉ <text:line-break/><text:span text:style-name="T1"> </text:span><text:span text:style-name="T2">(42/24) </text:span> ⲛⲉⲧⲉⲩⲛ̅ⲧⲁⲩ ⲇⲉ ⲙ̅ⲙⲁⲩ ⲛ̅‐ <text:line-break/><text:span text:style-name="T1"> </text:span><text:span text:style-name="T2">(42/25) </text:span> ⲛⲟⲩⲥⲩⲛⲉⲓⲇⲏⲥⲓⲥ ⲛ̅ⲉⲗⲉⲩ‐ <text:line-break/><text:span text:style-name="T1"> </text:span><text:span text:style-name="T2">(42/26) </text:span> ⲑⲉⲣⲁ· ϣⲁⲩⲥⲁϩⲱⲟⲩ ⲉⲃⲟⲗ <text:line-break/><text:span text:style-name="T1"> </text:span><text:span text:style-name="T2">(42/27) </text:span> ⲛ̅ⲧⲙ̅ⲛ̅ⲧ̅’̅ϩⲁϩ ⲛ̅ϣⲁϫⲉ ⲛ̅ⲧⲫⲩ‐ <text:line-break/><text:span text:style-name="T1"> </text:span><text:span text:style-name="T2">(42/28) </text:span> ⲥⲓⲥ· ⲥⲉⲛⲁⲣ̅ⲙⲁⲣⲧⲩⲣⲓ ⲅⲁⲣ <text:line-break/><text:span text:style-name="T1"> </text:span><text:span text:style-name="T2">(42/29) </text:span> ⲛ̅ⲧⲙⲁⲣⲧⲩⲣⲓⲁ ⲙ̅ⲕⲁⲑⲟⲗⲓⲕⲟⲛ· <text:line-break/><text:span text:style-name="T1"> </text:span><text:span text:style-name="T2">(42/30) </text:span> ⲥⲉⲛⲁⲕⲁⲕⲟⲩ ⲁϩⲏⲩ ⲙ̅ⲡⲃⲁⲣⲟⲥ <text:line-break/><text:span text:style-name="T1"> </text:span><text:span text:style-name="T2">(42/31) </text:span> ⲙ̅ⲡⲕⲁⲕⲉ· ⲥⲉⲛⲁϯ ϩ̅ⲓ̅ⲱⲟⲩ ⲙ̅‐ <text:line-break/><text:span text:style-name="T1"> </text:span><text:span text:style-name="T2">(42/32) </text:span> ⲡⲗⲟⲅⲟⲥ ⲙ̅ⲡⲟⲩⲟⲉⲓⲛ· ⲁⲩⲱ <text:line-break/><text:span text:style-name="T1"> </text:span><text:span text:style-name="T2">(42/33) </text:span> ⲥⲉⲛⲁ̣ⲣ̣̅ⲕⲱ̣[ⲗ]ⲩⲉ̣ [ⲙ̅]ⲙ̣ⲟⲟⲩ ⲁⲛ̣ <text:line-break/><text:span text:style-name="T1"> </text:span><text:span text:style-name="T2">(43/1) </text:span> ϩ̅ⲙ̅ ⲡⲧⲟⲡⲟⲥ ⲛ̅ⲉⲗⲁⲭⲓⲥⲧⲟⲥ· <text:line-break/><text:span text:style-name="T1"> </text:span><text:span text:style-name="T2">(43/2) </text:span> ⲁⲩⲱ ⲡⲉⲧⲉⲩⲛ̅ⲧⲁⲟⲩϥ ⲉⲃⲟⲗ <text:line-break/><text:span text:style-name="T1"> </text:span><text:span text:style-name="T2">(43/3) </text:span> ϩ̅ⲛ̅ ⲧⲇⲩⲛⲁⲙⲓⲥ ⲙ̅ⲡⲛⲟⲩⲥ ⲥⲉ‐ <text:line-break/><text:span text:style-name="T1"> </text:span><text:span text:style-name="T2">(43/4) </text:span> ⲛⲁⲧⲁⲁϥ ⲛ̅ⲧⲡⲓⲥⲧⲓⲥ· ⲥⲉⲛⲁⲣ̅‐ <text:line-break/><text:span text:style-name="T1"> </text:span><text:span text:style-name="T2">(43/5) </text:span> ⲡⲁⲣⲁⲇⲉⲭⲉ ⲙ̅ⲙⲟⲟⲩ ⲉⲛⲥⲉⲣ̅‐ <text:line-break/><text:span text:style-name="T1"> </text:span><text:span text:style-name="T2">(43/6) </text:span> ⲗⲩⲡⲏ ⲁⲛ· ⲁⲩⲱ ⲡⲕⲱϩ̅ⲧ̅’̅ ⲉⲧ’‐ <text:line-break/><text:span text:style-name="T1"> </text:span><text:span text:style-name="T2">(43/7) </text:span> ϣⲧ̅ⲣ̅ⲧⲱⲣ ⲉⲧⲉⲩⲛ̅ⲧⲁⲟⲩϥ ⲥⲉ‐ <text:line-break/><text:span text:style-name="T1"> </text:span><text:span text:style-name="T2">(43/8) </text:span> ⲛⲁⲕⲁⲁϥ ϩ̅ⲛ̅ ⲧⲙⲉⲥⲟⲧⲏⲥ ⲛ̅ⲧⲫⲩ‐ <text:line-break/><text:span text:style-name="T1"> </text:span><text:span text:style-name="T2">(43/9) </text:span> ⲥⲓⲥ· ⲁⲩⲱ ⲥⲉⲛⲁϫⲓⲧⲟⲩ ⲉⲣⲟ‐ <text:line-break/><text:span text:style-name="T1"> </text:span><text:span text:style-name="T2">(43/10) </text:span> ⲟⲩ ϩ̅ⲓ̅ⲧ̅ⲛ̅ ⲛⲁϩ̅ⲃ̅ⲥⲱ ⲛⲁⲓ̈ ⲉⲧ’ϣⲟ‐ <text:line-break/><text:span text:style-name="T1"> </text:span><text:span text:style-name="T2">(43/11) </text:span> ⲟⲡ ϩ̅ⲛ̅ ⲛ̅ⲕⲗⲟⲟⲗⲉ· ⲛ̅ⲧⲟⲟⲩ ⲡⲉ <text:line-break/><text:span text:style-name="T1"> </text:span><text:span text:style-name="T2">(43/12) </text:span> ⲉⲧ̅ⲣ̅ ϩ̅ⲙ̅ⲙⲉ ⲛ̅ⲛⲟⲩⲙⲉⲗⲟⲥ· ⲥⲉ‐ <text:line-break/><text:span text:style-name="T1"> </text:span><text:span text:style-name="T2">(43/13) </text:span> ⲛⲁⲙ̅ⲧⲟⲛ ⲙ̅ⲙⲟⲟⲩ ϩ̅ⲙ̅ ⲡ̅ⲛⲁ̅ ⲛ̅‐ <text:line-break/><text:span text:style-name="T1"> </text:span><text:span text:style-name="T2">(43/14) </text:span> ⲟⲩⲉϣ ⲛ̅ϩ̅ⲓ̅ⲥⲉ· ⲉⲧⲃⲉⲡⲁⲓ̈ ⲇⲉ ⲁⲧ‐ <text:line-break/><text:span text:style-name="T1"> </text:span><text:span text:style-name="T2">(43/15) </text:span> ⲡⲣⲟⲑⲉⲥⲙⲓⲁ ⲛ̅ⲧⲡⲓⲥⲧⲓⲥ ⲟⲩⲱ‐ <text:line-break/><text:span text:style-name="T1"> </text:span><text:span text:style-name="T2">(43/16) </text:span> ⲛ̅ϩ̅ ⲉⲃⲟⲗ ϩ̅ⲓ̅ϫ̅ⲙ̅ ⲡⲕⲁϩ ⲡⲣⲟⲥ ⲟⲩ‐ <text:line-break/><text:span text:style-name="T1"> </text:span><text:span text:style-name="T2">(43/17) </text:span> ⲕⲟⲩⲉ̅ⲓ̅ ⲛ̅ⲭⲣⲟⲛⲟⲥ ϣⲁⲛⲧⲟⲩ‐ <text:line-break/><text:span text:style-name="T1"> </text:span><text:span text:style-name="T2">(43/18) </text:span> ϥⲓ ⲙ̅ⲡⲕⲁⲕⲉ ⲉⲃⲟⲗ ⲛ̅ϩⲏⲧ̅ⲥ̅· ⲁⲩⲱ <text:line-break/><text:span text:style-name="T1"> </text:span><text:span text:style-name="T2">(43/19) </text:span> ⲛ̅ⲥ̅ϭⲱⲗ̅ⲡ̅ ⲉⲃⲟⲗ ⲛ̅ϭⲓ ⲧⲉⲥⲙⲁⲣ‐ <text:line-break/><text:span text:style-name="T1"> </text:span><text:span text:style-name="T2">(43/20) </text:span> ⲧⲩⲣⲓⲁ ⲧⲁⲓ̈ ⲛ̅ⲧⲁϩϭⲱⲗ̅ⲡ̅ ⲉⲃⲟⲗ <text:line-break/><text:soft-page-break/><text:span text:style-name="T1"> </text:span><text:span text:style-name="T2">(43/21) </text:span> ϩ̅ⲓ̅ⲧⲟⲟⲧ’· ⲛⲉⲧⲟⲩⲛⲁϭ̅ⲛ̅ⲧⲟⲩ <text:line-break/><text:span text:style-name="T1"> </text:span><text:span text:style-name="T2">(43/22) </text:span> ⲉⲩϣⲟⲟⲡ ⲉⲃⲟⲗ ϩ̅ⲛ̅ ⲧⲉⲥⲛⲟⲩ‐ <text:line-break/><text:span text:style-name="T1"> </text:span><text:span text:style-name="T2">(43/23) </text:span> ⲛⲉ ⲥⲉⲛⲁⲕⲁⲕⲟⲩ ⲁϩⲏⲟⲩ ⲙ̅ⲡ̅ <text:line-break/><text:span text:style-name="T1"> </text:span><text:span text:style-name="T2">(43/24) </text:span> ⲕⲁⲕⲉ ⲙ̅ⲛ̅ ⲡⲕⲱϩ̅ⲧ’̅ ⲉⲧ’ϣⲧ̅ⲣ̅ⲧⲱⲣ· <text:line-break/><text:span text:style-name="T1"> </text:span><text:span text:style-name="T2">(43/25) </text:span> ⲥⲉⲛⲁϯ ϩ̅ⲓ̅ⲱⲟⲩ ⲙ̅ⲡⲟⲩⲟⲉⲓⲛ <text:line-break/><text:span text:style-name="T1"> </text:span><text:span text:style-name="T2">(43/26) </text:span> ⲙ̅ⲡⲛⲟⲩⲥ· ⲁⲩⲱ ⲥⲉⲛⲁⲙⲁⲣ <text:line-break/><text:span text:style-name="T1"> </text:span><text:span text:style-name="T2">(43/27) </text:span> ⲧⲩⲣⲓ· ⲛⲉⲛⲧⲁⲉⲓϫⲟⲟⲩ ⲅⲁⲣ ⲧⲏ‐ <text:line-break/><text:span text:style-name="T1"> </text:span><text:span text:style-name="T2">(43/28) </text:span> ⲣⲟⲩ ⲡϩⲁⲙ ⲧⲣⲉⲩϣⲱⲡⲉ· ⲙ̅‐ <text:line-break/><text:span text:style-name="T1"> </text:span><text:span text:style-name="T2">(43/29) </text:span> ⲙ̅ⲛ̅ⲛ̅ⲥⲁ ⲧⲣⲁⲗⲟ ϩ̅ⲓ̅ϫ̅ⲙ̅ ⲡⲕⲁϩ ⲛ̅‐ <text:line-break/><text:span text:style-name="T1"> </text:span><text:span text:style-name="T2">(43/30) </text:span> ⲧⲁⲁⲛⲁⲭⲱⲣⲓ ⲉϩⲣⲁⲓ̈ ⲉⲧⲁⲁⲛⲁ‐ <text:line-break/><text:span text:style-name="T1"> </text:span><text:span text:style-name="T2">(43/31) </text:span> ⲡⲁⲩⲥⲓⲥ· ⲟⲩⲛ̅ ⲟⲩⲛⲟϭ ⲙ̅ⲡⲗⲁ‐ <text:line-break/><text:span text:style-name="T1"> </text:span><text:span text:style-name="T2">(43/32) </text:span> ⲛⲏ ⲛⲁϣⲱⲡⲉ ⲉⲥϩⲟⲟⲩ ϩ̅ⲓ̅ϫ̅ⲙ̅ <text:line-break/><text:span text:style-name="T1"> </text:span><text:span text:style-name="T2">(43/33) </text:span> ⲡⲕⲟⲥⲙⲟⲥ· ⲁⲩⲱ ϩⲁϩ ⲛ̅ⲕⲁ‐ <text:line-break/><text:span text:style-name="T1"> </text:span><text:span text:style-name="T2">(43/34) </text:span> ϭⲓⲁ ⲕⲁⲧⲁ ⲧⲏⲡ̅ⲥ̅ ⲛ̅ⲛ̅ⲙⲟ̣ⲣⲫⲏ ⲛ̅‐ <text:line-break/><text:span text:style-name="T1"> </text:span><text:span text:style-name="T2">(44/1) </text:span> ⲧⲫⲩⲥⲓⲥ· ⲥⲉⲛⲁϣⲱⲡⲉ ⲛ̅ϭⲓ ϩⲉⲛ̣ <text:line-break/><text:span text:style-name="T1"> </text:span><text:span text:style-name="T2">(44/2) </text:span> ⲕⲁⲓⲣⲟⲥ ⲉⲩϩⲟⲟⲩ· ⲁⲩⲱ ⲡⲕⲉ‐ <text:line-break/><text:span text:style-name="T1"> </text:span><text:span text:style-name="T2">(44/3) </text:span> ⲣⲟⲥ ⲛ̅ⲧⲫⲩⲥⲓⲥ ⲉϥϩⲏⲛ ⲉϩⲟⲩⲛ <text:line-break/><text:span text:style-name="T1"> </text:span><text:span text:style-name="T2">(44/4) </text:span> ⲉⲡⲧⲉⲕⲟ· ⲟⲩⲛ̅ ⲟⲩⲕⲁⲕⲉ ⲛⲁ‐ <text:line-break/><text:span text:style-name="T1"> </text:span><text:span text:style-name="T2">(44/5) </text:span> ϣⲱⲡⲉ ϩ̅ⲓ̅ϫ̅ⲙ̅ ⲡⲕⲁϩ ⲧⲏⲡ̅ⲥ̅ ⲛⲁ‐ <text:line-break/><text:span text:style-name="T1"> </text:span><text:span text:style-name="T2">(44/6) </text:span> ⲥⲃⲟⲗ· ⲁⲩⲱ ⲟⲩ̅ⲛ̅ ⲟⲩⲇⲁⲓⲙⲱⲛ <text:line-break/><text:span text:style-name="T1"> </text:span><text:span text:style-name="T2">(44/7) </text:span> ⲛ̅ⲛⲏⲩ ⲉϩⲣⲁⲓ̈ ϩ̅ⲛ̅ ⲧⲇⲩⲛⲁⲙⲓⲥ ⲉⲩ‐ <text:line-break/><text:span text:style-name="T1"> </text:span><text:span text:style-name="T2">(44/8) </text:span> ⲛ̅ⲧⲁϥ ⲙ̅ⲙⲁⲩ ⲛ̅ⲟⲩⲉⲓⲛⲉ ⲛ̅ⲕⲱ‐ <text:line-break/><text:span text:style-name="T1"> </text:span><text:span text:style-name="T2">(44/9) </text:span> ϩ̅ⲧ̅’̅· ϥⲛⲁⲡⲱϩ ⲛ̅ⲧⲡⲉ· ϥⲛⲁⲙ̅ⲧⲟⲛ <text:line-break/><text:span text:style-name="T1"> </text:span><text:span text:style-name="T2">(44/10) </text:span> ⲙ̅ⲙⲟϥ ϩ̅ⲙ̅ ⲡⲃⲁⲑⲟⲥ ⲛ̅ⲧⲁⲛⲁⲧⲟ‐ <text:line-break/><text:span text:style-name="T1"> </text:span><text:span text:style-name="T2">(44/11) </text:span> ⲗⲏ· ⲧⲕⲧⲓⲥⲓⲥ ⲅⲁⲣ ⲧⲏⲣ̅ⲥ̅ ⲛⲁⲕⲓⲙ· <text:line-break/><text:span text:style-name="T1"> </text:span><text:span text:style-name="T2">(44/12) </text:span> ⲁⲩⲱ ⲡⲕⲟⲥⲙⲟⲥ ⲉⲧ̅ⲣ̅ⲡⲗⲁⲛⲁⲥ‐ <text:line-break/><text:span text:style-name="T1"> </text:span><text:span text:style-name="T2">(44/13) </text:span> ⲑⲁⲓ ⲛⲁϣⲧⲟⲣⲧ̅ⲣ̅· ⲥⲉⲛⲁⲱⲙ̅ⲥ̅ <text:line-break/><text:span text:style-name="T1"> </text:span><text:span text:style-name="T2">(44/14) </text:span> ⲛ̅ϩⲁϩ ⲛ̅ⲧⲟⲡⲟⲥ ⲕⲁⲧⲁ ⲟⲩⲫⲑⲟ‐ <text:line-break/><text:span text:style-name="T1"> </text:span><text:span text:style-name="T2">(44/15) </text:span> ⲛⲟⲥ ⲛ̅ⲛ̅ⲧⲏⲟⲩ ⲙ̅ⲛ̅ ⲛ̅ⲇⲁⲓⲙⲱⲛ <text:line-break/><text:span text:style-name="T1"> </text:span><text:span text:style-name="T2">(44/16) </text:span> ⲛⲁⲓ̈ ⲉⲩⲛ̅ⲧⲁⲩ ⲙ̅ⲙⲁⲩ ⲛ̅ⲟⲩⲣⲁⲛ <text:line-break/><text:span text:style-name="T1"> </text:span><text:span text:style-name="T2">(44/17) </text:span> ⲙ̅ⲙ̅ⲛ̅ⲧ̅ⲁⲑⲏⲧ’· ⲫⲟⲣⲃⲉⲁ· ⲭⲗ̅ⲟⲉⲣⲅ̅ⲁ· <text:line-break/><text:span text:style-name="T1"> </text:span><text:span text:style-name="T2">(44/18) </text:span> ⲛⲁⲓ̈ ⲛⲉ ⲉⲧ̅ⲣ̅ⲇⲓⲟⲓⲕⲉⲓ ⲙ̅ⲡⲕⲟⲥ‐ <text:line-break/><text:span text:style-name="T1"> </text:span><text:span text:style-name="T2">(44/19) </text:span> ⲙⲟⲥ ϩ̅ⲛ̅ ⲧⲉⲩⲥⲃⲱ· ⲁⲩⲱ ⲥⲉⲣ̅‐ <text:line-break/><text:span text:style-name="T1"> </text:span><text:span text:style-name="T2">(44/20) </text:span> ⲡⲗⲁⲛⲁ ⲛ̅ϩⲁϩ ⲛ̅ϩⲏⲧ’ ⲉⲧⲃⲉ ⲧⲟⲩ‐ <text:line-break/><text:span text:style-name="T1"> </text:span><text:span text:style-name="T2">(44/21) </text:span> ⲁⲧⲁⲝⲓⲁ ⲙ̅ⲛ̅ ⲧⲟⲩⲁⲕⲁⲑⲁⲣⲥⲓⲁ· <text:line-break/><text:span text:style-name="T1"> </text:span><text:span text:style-name="T2">(44/22) </text:span> ϩⲁϩ ⲛ̅ⲧⲟⲡⲟⲥ ⲥⲉⲛⲁϭⲉϣϭⲱ <text:line-break/><text:span text:style-name="T1"> </text:span><text:span text:style-name="T2">(44/23) </text:span> ϣⲟⲩ ⲛ̅ⲥⲛⲟϥ· ⲁⲩⲱ ⲟⲩⲛ̅ ϯ <text:line-break/><text:span text:style-name="T1"> </text:span><text:span text:style-name="T2">(44/24) </text:span> ⲛ̅ⲅⲉⲛⲉⲁ ⲉⲃⲟⲗ ϩ̅ⲓ̅ⲧⲟⲟⲧⲟⲩ <text:line-break/><text:span text:style-name="T1"> </text:span><text:span text:style-name="T2">(44/25) </text:span> ⲟⲩⲁⲁⲩ ⲥⲉⲛⲁⲟⲩⲱⲙ ⲛ̅ⲛⲉⲩ‐ <text:line-break/><text:span text:style-name="T1"> </text:span><text:span text:style-name="T2">(44/26) </text:span> ϣⲏⲣⲉ· ⲙ̅ⲙⲉⲣⲟⲥ ⲇⲉ ⲙ̅ⲡⲥⲁ‐ <text:line-break/><text:span text:style-name="T1"> </text:span><text:span text:style-name="T2">(44/27) </text:span> ⲣⲏⲥ ⲥⲉⲛⲁϫⲓ ⲙ̅ⲡⲗⲟⲅⲟⲥ ⲙ̅ⲡⲟⲩ‐ <text:line-break/><text:span text:style-name="T1"> </text:span><text:span text:style-name="T2">(44/28) </text:span> ⲟⲉⲓⲛ· ⲛⲉⲧ’ϣⲟⲟⲡ ⲇⲉ ⲉⲃⲟⲗ <text:line-break/><text:span text:style-name="T1"> </text:span><text:span text:style-name="T2">(44/29) </text:span> ϩ̅ⲛ̅ ⲧⲡⲗⲁⲛⲏ ⲙ̅ⲡⲕⲟⲥⲙⲟⲥ <text:line-break/><text:span text:style-name="T1"> </text:span><text:span text:style-name="T2">(44/30) </text:span> ⲁⲩⲱ ⲉⲃⲟⲗ ϩ̅ⲛ̅ ⲧⲁⲛⲁⲧⲟⲗⲏ· <text:line-break/><text:span text:style-name="T1"> </text:span><text:span text:style-name="T2">(44/31) </text:span> ϥⲛⲏⲩ ⲉⲃⲟⲗ ⲛ̅ϭⲓ ⲟⲩⲇⲁⲓⲙⲱⲛ <text:line-break/><text:span text:style-name="T1"> </text:span><text:span text:style-name="T2">(44/32) </text:span> ϩ̅ⲛ̅ ϩⲏⲧ̅ϥ̅ ⲙ̅ⲡ̅ⲇⲣⲁⲕⲱⲛ· ⲛⲉϥ‐ <text:line-break/><text:span text:style-name="T1"> </text:span><text:span text:style-name="T2">(45/1) </text:span> ⲕⲏⲡ ϩ̅ⲛ̅ ⲟⲩⲧⲟⲡⲟⲥ ⲛ̅ⲉⲣⲏⲙⲟⲥ· <text:line-break/><text:soft-page-break/><text:span text:style-name="T1"> </text:span><text:span text:style-name="T2">(45/2) </text:span> ϥⲛⲁⲣ̅ ϩⲁϩ ⲛ̅ϣⲡⲏⲣⲉ· ⲟⲩⲛ̅ ϩⲁϩ <text:line-break/><text:span text:style-name="T1"> </text:span><text:span text:style-name="T2">(45/3) </text:span> ⲛⲁⲣ̅ⲥⲓⲭⲁⲛⲉ ⲙ̅ⲙⲟϥ· ⲟⲩⲛ̅ ⲟⲩ‐ <text:line-break/><text:span text:style-name="T1"> </text:span><text:span text:style-name="T2">(45/4) </text:span> ⲧⲏⲟⲩ ⲛ̅ⲛⲏⲩ ⲉⲃⲟⲗ ϩ̅ⲛ̅ ⲣⲱϥ ⲉϥⲟ‐ <text:line-break/><text:span text:style-name="T1"> </text:span><text:span text:style-name="T2">(45/5) </text:span> ⲛ̅ⲉⲓⲛⲉ ⲛ̅ⲥϩ̅ⲓ̅ⲙⲉ· ⲉⲩⲛⲁⲙⲟⲩⲧⲉ <text:line-break/><text:span text:style-name="T1"> </text:span><text:span text:style-name="T2">(45/6) </text:span> ⲉⲡⲉⲥⲣⲁⲛ ϫⲉ ⲁ̅ⲃ̅ⲁ̅ⲗ̅ⲫ̅ⲏ̅· ϥⲛⲁⲣ̅ <text:line-break/><text:span text:style-name="T1"> </text:span><text:span text:style-name="T2">(45/7) </text:span> ⲣ̅ⲣⲟ ⲉϫ̅ⲙ̅ ⲡⲕⲟⲥⲙⲟⲥ ϫⲓⲛ ⲙ̅ⲙⲁ <text:line-break/><text:span text:style-name="T1"> </text:span><text:span text:style-name="T2">(45/8) </text:span> ⲙ̅ⲡⲓⲣⲉ ϣⲁ ⲙ̅ⲙⲁ ⲛ̅ϩⲱⲧ̅ⲡ̅· ⲧⲟ‐ <text:line-break/><text:span text:style-name="T1"> </text:span><text:span text:style-name="T2">(45/9) </text:span> ⲧⲉ ⲟⲩⲛ̅ ⲟⲩⲕⲁⲓⲣⲟⲥ ⲛ̅ϩⲁⲉ ⲛⲁ‐ <text:line-break/><text:span text:style-name="T1"> </text:span><text:span text:style-name="T2">(45/10) </text:span> ϣⲱⲡⲉ ⲛ̅ⲧⲫⲩⲥⲓⲥ· ⲁⲩⲱ ⲛ̅ⲥⲓ <text:line-break/><text:span text:style-name="T1"> </text:span><text:span text:style-name="T2">(45/11) </text:span> ⲟⲩ ⲛⲁⲗⲟ ϩ̅ⲛ̅ ⲧⲡⲉ· ⲥⲉⲛⲁⲟⲩⲱⲛ <text:line-break/><text:span text:style-name="T1"> </text:span><text:span text:style-name="T2">(45/12) </text:span> ⲙ̅ⲡⲣⲟ ⲙ̅ⲡⲥⲱⲣ̅ⲙ̅· ϣⲓⲛⲁ ⲉⲣⲉ‐ <text:line-break/><text:span text:style-name="T1"> </text:span><text:span text:style-name="T2">(45/13) </text:span> ⲡⲕⲁⲕⲉ ⲉⲑⲟⲟⲩ ⲛⲁⲟⲩⲱⲥ̅ϥ̅ ⲛ̅‐ <text:line-break/><text:span text:style-name="T1"> </text:span><text:span text:style-name="T2">(45/14) </text:span> ⲥⲉⲧ̅ⲙ̅ⲣⲱϥ· ⲁⲩⲱ ϩ̅ⲙ̅ ⲫⲁⲉ ⲛ̅ϩⲟ‐ <text:line-break/><text:span text:style-name="T1"> </text:span><text:span text:style-name="T2">(45/15) </text:span> ⲟⲩ ⲥⲉⲛⲁϥⲱⲧⲉ ⲉⲃⲟⲗ ⲛ̅ⲛ̅ⲙⲟⲣ‐ <text:line-break/><text:span text:style-name="T1"> </text:span><text:span text:style-name="T2">(45/16) </text:span> ⲫⲏ ⲛ̅ⲧⲫⲩⲥⲓⲥ ⲙ̅ⲛ̅ ⲛ̅ⲧⲏⲩ ⲙ̅ⲛ̅ <text:line-break/><text:span text:style-name="T1"> </text:span><text:span text:style-name="T2">(45/17) </text:span> ⲛⲟⲩⲇⲁⲓⲙⲱⲛ ⲧⲏⲣⲟⲩ· ⲥⲉ‐ <text:line-break/><text:span text:style-name="T1"> </text:span><text:span text:style-name="T2">(45/18) </text:span> ⲛⲁϣⲱⲡⲉ ⲛ̅ⲛⲟⲩⲃⲱⲗⲟⲥ ⲛ̅ⲕⲁ‐ <text:line-break/><text:span text:style-name="T1"> </text:span><text:span text:style-name="T2">(45/19) </text:span> ⲕⲉ ⲛ̅ⲑⲉ ⲉⲧⲟⲩϣⲟⲟⲡ ⲙ̅ⲙⲟⲥ <text:line-break/><text:span text:style-name="T1"> </text:span><text:span text:style-name="T2">(45/20) </text:span> ϫⲓⲛ ⲛ̅ϣⲟⲣ̅ⲡ̅· ⲁⲩⲱ ⲙ̅ⲙⲟⲩⲉⲓ‐ <text:line-break/><text:span text:style-name="T1"> </text:span><text:span text:style-name="T2">(45/21) </text:span> ⲟⲟⲩⲉ ⲉⲧ’ϩⲟⲗ̅ϭ̅ ⲛⲁⲱϫ̅ⲛ̅· ⲛⲁⲓ̈ <text:line-break/><text:span text:style-name="T1"> </text:span><text:span text:style-name="T2">(45/22) </text:span> ⲛ̅ⲧⲁⲩⲣ̅ⲃⲁⲣⲓ ⲙ̅ⲙⲟⲟⲩ ϩ̅ⲓ̅ⲧ̅ⲛ̅ ⲛ̅‐ <text:line-break/><text:span text:style-name="T1"> </text:span><text:span text:style-name="T2">(45/23) </text:span> ⲇⲁⲓⲙⲱⲛ· ⲡⲙⲁ ⲅⲁⲣ ⲛ̅ⲧⲁⲥⲃⲱⲕ <text:line-break/><text:span text:style-name="T1"> </text:span><text:span text:style-name="T2">(45/24) </text:span> ⲉⲙⲁⲩ ⲛ̅ϭⲓ ⲧⲇⲩⲛⲁⲙⲓⲥ ⲙ̅ⲡ̅ⲛ̅ⲁ̅ <text:line-break/><text:span text:style-name="T1"> </text:span><text:span text:style-name="T2">(45/25) </text:span> ⲉⲩϣⲟⲟⲡ ⲙ̅ⲙⲁⲩ ⲛ̅ϭⲓ ⲛⲁⲙⲟⲩ‐ <text:line-break/><text:span text:style-name="T1"> </text:span><text:span text:style-name="T2">(45/26) </text:span> ⲉⲓⲟⲟⲩⲉ ⲉⲧ’ϩⲟⲗ̅ϭ̅· ⲛ̅ⲕⲉϩⲃⲏ‐ <text:line-break/><text:span text:style-name="T1"> </text:span><text:span text:style-name="T2">(45/27) </text:span> ⲟⲩⲉ ⲛ̅ⲧⲫⲩⲥⲓⲥ ⲥⲉⲛⲁⲟⲩⲱⲛ̅ϩ̅ <text:line-break/><text:span text:style-name="T1"> </text:span><text:span text:style-name="T2">(45/28) </text:span> ⲉⲃⲟⲗ ⲁⲛ· ⲥⲉⲛⲁⲧⲱϩ ⲙ̅ⲛ̅ ⲙ̅‐ <text:line-break/><text:span text:style-name="T1"> </text:span><text:span text:style-name="T2">(45/29) </text:span> ⲙⲟⲩⲉⲓⲏ ⲛ̅ⲕⲁⲕⲉ ⲉⲙ̅ⲛ̅ⲧⲉⲩ <text:line-break/><text:span text:style-name="T1"> </text:span><text:span text:style-name="T2">(45/30) </text:span> ⲁⲣⲏϫ̅ϥ̅· ⲁⲩⲱ ⲛⲉⲥⲉⲓⲛⲉ ⲧⲏ‐ <text:line-break/><text:span text:style-name="T1"> </text:span><text:span text:style-name="T2">(45/31) </text:span> ⲣⲟⲩ ⲛⲁⲗⲟ ⲛ̅ⲧⲙⲏⲧⲉ· ⲁⲛⲟⲕ <text:line-break/><text:span text:style-name="T1"> </text:span><text:span text:style-name="T2">(45/32) </text:span> ⲥⲏⲉⲙ ⲁⲉⲓϫⲉⲕ ⲛⲁⲓ̈ ⲉⲃⲟⲗ ⲁⲩⲱ <text:line-break/><text:span text:style-name="T1"> </text:span><text:span text:style-name="T2">(45/33) </text:span> ⲁⲡⲁϩⲏⲧ’ ⲣ̅ⲁⲣⲭⲉⲥⲑⲁⲓ ⲙ̅ⲡⲱ‐ <text:line-break/><text:span text:style-name="T1"> </text:span><text:span text:style-name="T2">(45/34) </text:span> ⲣ̅]̅ϫ̅ ⲉⲡⲥⲱⲙⲁ ⲛ̅ⲕⲁⲕⲉ· ⲁⲡⲁ‐ <text:line-break/><text:span text:style-name="T1"> </text:span><text:span text:style-name="T2">(46/1) </text:span> ⲭⲣⲟⲛⲟⲥ ϫⲱⲕ ⲉⲃⲟⲗ· ⲁⲩⲱ <text:line-break/><text:span text:style-name="T1"> </text:span><text:span text:style-name="T2">(46/2) </text:span> ⲁⲡⲁϩⲏⲧ’ ϯ ϩ̅ⲓ̅ⲱⲱϥ ⲙ̅ⲫⲩⲡⲟ‐ <text:line-break/><text:span text:style-name="T1"> </text:span><text:span text:style-name="T2">(46/3) </text:span> ⲙⲛⲏⲙⲁ ⲛ̅ⲁⲑⲁⲛⲁⲧⲟⲛ· ⲁⲩⲱ ⲡⲉ‐ <text:line-break/><text:span text:style-name="T1"> </text:span><text:span text:style-name="T2">(46/4) </text:span> ϫⲁⲓ̈ ϫⲉ ϯⲧⲏⲧ’ ⲛ̅ϩⲏⲧ’ ⲙ̅ⲛ̅ ⲡⲉⲕ‐ <text:line-break/><text:span text:style-name="T1"> </text:span><text:span text:style-name="T2">(46/5) </text:span> ϩⲩⲡⲟⲙⲛⲏⲙⲁ· ⲡⲁⲓ̈ ⲛ̅ⲧⲁⲕϭⲟⲗ <text:line-break/><text:span text:style-name="T1"> </text:span><text:span text:style-name="T2">(46/6) </text:span> ⲡ̅ϥ̅ ⲛⲁⲓ̈ ⲉⲃⲟⲗ ⲉ̅ⲗⲱⲣⲭⲁⲓⲉ̅· ⲁⲩⲱ <text:line-break/><text:span text:style-name="T1"> </text:span><text:span text:style-name="T2">(46/7) </text:span> ⲛ̅ⲧⲟⲕ ⲁ̅ⲙ̅ⲟ̅ⲓ̅ⲁ̅ⲓ̅ⲁ̅ⲓ̅· ⲁⲩⲱ ⲛ̅ⲧⲟⲕ <text:line-break/><text:span text:style-name="T1"> </text:span><text:span text:style-name="T2">(46/8) </text:span> ⲥ̅ⲉ̅ⲇ̅ⲉ̅ⲣ̅ⲕ̅ⲉ̅ⲁ̅· ⲁⲩⲱ ⲧⲉⲕⲙ̅ⲛⲧ’̅ⲃⲁⲗ <text:line-break/><text:span text:style-name="T1"> </text:span><text:span text:style-name="T2">(46/9) </text:span> ϩⲏⲧ’ ⲥ̅ⲧ̅ⲣ̅ⲟ̅ⲫ̅ⲉ̅ⲁ̅· ⲁⲩⲱ ⲛ̅ⲧⲟⲕ ⲭ̅ⲉⲗ̅ <text:line-break/><text:span text:style-name="T1"> </text:span><text:span text:style-name="T2">(46/10) </text:span> ⲕ̅ⲉ̅ⲁ̅ⲕ̅· ⲁⲩⲱ ⲛ̅ⲧⲟⲕ ⲭ̅ⲉⲗⲕⲉⲁ̅· ⲙ̅ⲛ̅ <text:line-break/><text:span text:style-name="T1"> </text:span><text:span text:style-name="T2">(46/11) </text:span> ⲭ̅ⲉ̅ⲗ̅ⲕ̅ⲉ̅· ⲙ̅ⲛ̅ ⲉ̅ⲗⲁⲓⲉ̅· ⲛ̅ⲧⲱⲧ̅ⲛ̅ ⲡⲉ <text:line-break/><text:span text:style-name="T1"> </text:span><text:span text:style-name="T2">(46/12) </text:span> ⲫⲩⲡⲟⲙⲛⲏⲙⲁ ⲛ̅ⲁⲑⲁⲛⲁⲧⲟⲛ· <text:line-break/><text:span text:style-name="T1"> </text:span><text:span text:style-name="T2">(46/13) </text:span> ϯⲣ̅ ⲙ̅ⲛ̅ⲧⲣⲉ ⲙ̅ⲙⲟⲕ ⲥⲡⲓⲛⲑⲏⲣ <text:line-break/><text:span text:style-name="T1"> </text:span><text:span text:style-name="T2">(46/14) </text:span> ⲡⲉⲧⲉⲙⲁϥⲱϣ̅ⲙ̅· ⲡⲉⲧⲟ ⲛ̅ⲃⲁⲗ <text:line-break/><text:soft-page-break/><text:span text:style-name="T1"> </text:span><text:span text:style-name="T2">(46/15) </text:span> ⲛ̅ⲧⲡⲉ· ⲁⲩⲱ ⲛ̅ϩⲣⲟⲟⲩ ⲛ̅ⲟⲩⲟ‐ <text:line-break/><text:span text:style-name="T1"> </text:span><text:span text:style-name="T2">(46/16) </text:span> ⲉⲓⲛ· ⲁⲩⲱ ⲥ̅ⲟ̅ⲫ̅ⲁ̅ⲓ̅ⲁ̅ ⲙ̅ⲛ̅ ⲥ̅ⲁⲫⲁⲓⲁ̅ <text:line-break/><text:span text:style-name="T1"> </text:span><text:span text:style-name="T2">(46/17) </text:span> ⲙ̅ⲛ̅ ⲥ̅ⲁⲫⲁⲓⲛⲁ̅· ⲙ̅ⲛ̅ ⲡⲇⲓⲕⲁⲓⲟⲥ <text:line-break/><text:span text:style-name="T1"> </text:span><text:span text:style-name="T2">(46/18) </text:span> ⲥ̅ⲡ̅ⲓ̅ⲛ̅ⲑ̅ⲏ̅ⲣ̅· ⲁⲩⲱ ⲧⲡⲓⲥⲧⲓⲥ ⲧϣⲟ‐ <text:line-break/><text:span text:style-name="T1"> </text:span><text:span text:style-name="T2">(46/19) </text:span> ⲣ̅ⲡ̅ ⲙ̅ⲛ̅ ⲑⲁⲏ· ⲙ̅ⲛ̅ ⲡⲁ̅ⲓⲑⲏⲣ̅ ⲙ̅ⲛ̅ ⲡⲁ‐ <text:line-break/><text:span text:style-name="T1"> </text:span><text:span text:style-name="T2">(46/20) </text:span> ⲏⲣ· {ⲁⲩⲱ ⲛ̅ⲧⲟⲕ ⲭⲉ̅ⲗ̅ⲕ̅ⲉ̅ⲁ̅ⲕ̅· ⲙ̅ⲛ̅ <text:line-break/><text:span text:style-name="T1"> </text:span><text:span text:style-name="T2">(46/21) </text:span> ⲭⲉ̅ⲗ̅ⲕ̅ⲉ̅· ⲙ̅ⲛ̅ ⲉ̅ⲗⲁⲓⲉ̅· ⲛ̅ⲧⲱⲧ̅ⲛ̅ <text:line-break/><text:span text:style-name="T1"> </text:span><text:span text:style-name="T2">(46/22) </text:span> ⲡⲉ ⲫⲩⲡⲟⲙⲛⲏⲙⲁ ⲛ̅ⲁⲑⲁⲛⲁⲧⲟⲛ· <text:line-break/><text:span text:style-name="T1"> </text:span><text:span text:style-name="T2">(46/23) </text:span> ϯⲣ̅ ⲙ̅ⲛ̅ⲧⲣⲉ ⲙ̅ⲙⲟⲕ ⲥⲡⲓⲛⲑⲏⲣ ⲡⲉ <text:line-break/><text:span text:style-name="T1"> </text:span><text:span text:style-name="T2">(46/24) </text:span> ⲧⲉⲙⲁϥⲱϣ̅ⲙ̅· ⲡⲉⲧⲉ ⲛ̅ⲃⲁⲗ ⲛ̅ⲧⲡⲉ <text:line-break/><text:span text:style-name="T1"> </text:span><text:span text:style-name="T2">(46/25) </text:span> ⲁⲩⲱ ⲛ̅ϩⲣⲟⲟⲩ ⲛ̅ⲟⲩⲟⲉⲓⲛ· ⲁⲩⲱ <text:line-break/><text:span text:style-name="T1"> </text:span><text:span text:style-name="T2">(46/26) </text:span> ⲥ̅ⲟ̅ⲫ̅ⲁ̅ⲓ̅ⲁ̅· ⲙ̅ⲛ̅ ⲥ̅ⲁⲫⲁⲓⲁ̅· ⲙ̅ⲛ̅ ⲥⲁ <text:line-break/><text:span text:style-name="T1"> </text:span><text:span text:style-name="T2">(46/27) </text:span> ⲫⲁⲓⲛⲁ· ⲙ̅ⲛ̅ ⲡⲇⲓⲕⲁⲓⲟⲥ ⲥⲡ̅ⲓⲛⲑⲏⲣ̅· <text:line-break/><text:span text:style-name="T1"> </text:span><text:span text:style-name="T2">(46/28) </text:span> ⲁⲩⲱ ⲧⲡⲓⲥⲧⲓⲥ ⲧϣⲟⲣ̅ⲡ̅ ⲙ̅ⲛ̅ ⲑⲁⲏ· <text:line-break/><text:span text:style-name="T1"> </text:span><text:span text:style-name="T2">(46/29) </text:span> ⲙ̅ⲛ̅ ⲡⲁⲓⲑⲏⲣ· ⲙ̅ⲛ̅ ⲡⲁⲏⲣ· ⲁⲩⲱ ⲛ̅‐ <text:line-break/><text:span text:style-name="T1"> </text:span><text:span text:style-name="T2">(46/30) </text:span> ⲇⲩⲛⲁⲙⲓⲥ ⲧⲏⲣⲟⲩ ⲙ̅ⲛ̅ ⲛⲉⲝⲟⲩ‐ <text:line-break/><text:span text:style-name="T1"> </text:span><text:span text:style-name="T2">(46/31) </text:span> ⲥⲓⲁ ⲛⲉⲧ’ϣⲟⲟⲡ ϩ̅ⲛ̅ ⲧⲕⲧⲓⲥⲓⲥ· <text:line-break/><text:span text:style-name="T1"> </text:span><text:span text:style-name="T2">(46/32) </text:span> ⲁⲩⲱ ⲛ̅ⲧⲟⲕ ⲡⲟⲩⲟⲉⲓⲛ ⲉⲧ’ϫⲁ <text:line-break/><text:span text:style-name="T1"> </text:span><text:span text:style-name="T2">(46/33) </text:span> ϩ̅ⲙ̅· ⲁⲩⲱ ⲛ̅ⲧⲟⲕ ϩⲱⲱⲕ ⲡ̅ⲣ̅ⲣⲓⲉ <text:line-break/><text:span text:style-name="T1"> </text:span><text:span text:style-name="T2">(46/34) </text:span> ⲙ̅ⲛ̅ ⲡϩⲱⲧ̅ⲡ̅· ⲁⲩⲱ ⲡⲥⲁⲣⲏⲥ ⲙ̣̅ⲛ̣̅ <text:line-break/><text:span text:style-name="T1"> </text:span><text:span text:style-name="T2">(46/35) </text:span> ⲡⲉⲙϩⲓⲧ’· ⲛ̅ⲧⲱⲧ̅ⲛ̅ ⲡⲉ ⲛ̅ⲕⲗ[ⲓ] <text:line-break/><text:span text:style-name="T1"> </text:span><text:span text:style-name="T2">(47/1) </text:span> ⲙⲁ{ⲝ} ⲛ̅ⲧⲟⲓⲕⲟⲩⲙⲉⲛⲏ· ⲁⲩⲱ <text:line-break/><text:span text:style-name="T1"> </text:span><text:span text:style-name="T2">(47/2) </text:span> ⲛ̅ⲧⲟ ϩⲱⲉ ⲙⲟ̅ⲗ̅ⲩ̅ⲭ̅ⲑ̅ⲁ̅· ⲙ̅ⲛ̅ ⲉⲥ‐ <text:line-break/><text:span text:style-name="T1"> </text:span><text:span text:style-name="T2">(47/3) </text:span> ⲥ̅ⲱ̅ⲭ̅· ⲛ̅ⲧⲱⲧ̅ⲛ̅ ⲡⲉ ⲧⲛⲟⲩⲛⲉ <text:line-break/><text:span text:style-name="T1"> </text:span><text:span text:style-name="T2">(47/4) </text:span> ⲛ̅ⲧⲕⲁϭⲓⲁ· ⲁⲩⲱ ⲉⲣⲅⲟⲛ ⲛⲓⲙ ϩ̅ⲓ̅ <text:line-break/><text:span text:style-name="T1"> </text:span><text:span text:style-name="T2">(47/5) </text:span> ϩ̅ⲓ̅ⲥⲉ ⲉϥϫⲁϩ̅ⲙ̅ ⲛ̅ⲧⲉ ⲧⲫⲩⲥⲓⲥ· <text:line-break/><text:span text:style-name="T1"> </text:span><text:span text:style-name="T2">(47/6) </text:span> ⲛⲁⲓ̈ ⲛⲉ ⲛ̅ⲧⲁⲉⲓϫⲟⲕⲟⲩ ⲉⲃⲟⲗ̓ <text:line-break/><text:span text:style-name="T1"> </text:span><text:span text:style-name="T2">(47/7) </text:span> ⲉⲉⲓⲙⲁⲣⲧⲩⲣⲓ· ⲁⲛⲟⲕ ⲡⲉ ⲥ̅ⲏ̅ⲉ̅ⲙ̅ <text:line-break/><text:span text:style-name="T1"> </text:span><text:span text:style-name="T2">(47/8) </text:span> ϩ̅ⲙ̅ ⲡϩⲟⲟⲩ ⲉϯⲛ̅ⲛⲏⲩ ⲉⲃⲟⲗ <text:line-break/><text:span text:style-name="T1"> </text:span><text:span text:style-name="T2">(47/9) </text:span> ϩ̅ⲛ̅ ⲥⲱⲙⲁ· ⲛ̅ⲧⲁⲣⲉⲡⲁⲙⲉⲉⲩⲉ <text:line-break/><text:span text:style-name="T1"> </text:span><text:span text:style-name="T2">(47/10) </text:span> ϭⲱ ϩ̅ⲛ̅ ⲥⲱⲙⲁ· ⲁⲉⲓⲧⲱⲱⲛ ϩⲱⲥ <text:line-break/><text:span text:style-name="T1"> </text:span><text:span text:style-name="T2">(47/11) </text:span> ⲉⲃⲟⲗ ϩ̅ⲛ̅ ⲟⲩⲛⲟϭ ⲛ̅ϩ̅ⲓ̅ⲛⲏⲃ· ⲁⲩⲱ <text:line-break/><text:span text:style-name="T1"> </text:span><text:span text:style-name="T2">(47/12) </text:span> ⲛ̅ⲧⲁⲣⲓⲧⲱⲛ ϩⲱⲥ ⲉⲃⲟⲗ ϩ̅ⲙ̅ ⲡⲃⲁ‐ <text:line-break/><text:span text:style-name="T1"> </text:span><text:span text:style-name="T2">(47/13) </text:span> ⲣⲟⲥ ⲙ̅ⲡⲁⲥⲱⲙⲁ· ⲁⲉⲓϫⲟⲟⲥ ϫⲉ <text:line-break/><text:span text:style-name="T1"> </text:span><text:span text:style-name="T2">(47/14) </text:span> ⲕⲁⲧⲁ ⲑⲉ ⲛ̅ⲧⲁⲧⲫⲩⲥⲓⲥ ⲣ̅ ϩ̅ⲗ̅ⲗⲱ <text:line-break/><text:span text:style-name="T1"> </text:span><text:span text:style-name="T2">(47/15) </text:span> ⲧⲁⲓ̈ ⲧⲉ ⲑⲉ ϩⲱⲱⲥ ⲙ̅ⲫⲟⲟⲩ ⲛ̅ <text:line-break/><text:span text:style-name="T1"> </text:span><text:span text:style-name="T2">(47/16) </text:span> ⲧⲙ̅ⲛ̅ⲧ̅’̅ⲣⲱⲙⲉ· ϩⲉⲛⲙⲁⲕⲁⲣⲓⲟⲥ <text:line-break/><text:span text:style-name="T1"> </text:span><text:span text:style-name="T2">(47/17) </text:span> ⲛⲉ ⲛⲉⲛⲧⲁⲩⲉⲓⲙⲉ ϩⲟⲧⲁⲛ ⲉⲩ‐ <text:line-break/><text:span text:style-name="T1"> </text:span><text:span text:style-name="T2">(47/18) </text:span> ϣⲁⲛϩ̅ⲓ̅ⲛⲏⲃ ϫⲉ ⲉⲣⲉⲡⲟⲩⲙⲉ <text:line-break/><text:span text:style-name="T1"> </text:span><text:span text:style-name="T2">(47/19) </text:span> ⲉⲩⲉ ⲣ̅ⲁⲛⲁⲡⲁⲩⲉⲥⲑⲁⲓ ϩ̅ⲛ̅ ⲁϣ‐ <text:line-break/><text:span text:style-name="T1"> </text:span><text:span text:style-name="T2">(47/20) </text:span> ⲛ̅ⲇⲩⲛⲁⲙⲓⲥ· ⲁⲩⲱ ⲛ̅ⲧⲁⲣⲉⲧϭⲓ‐ <text:line-break/><text:span text:style-name="T1"> </text:span><text:span text:style-name="T2">(47/21) </text:span> ⲙⲟⲩⲧ’ ⲡⲱϩ ⲁⲉⲓⲛⲁⲩ ⲉϩⲉⲛⲕⲗⲟ‐ <text:line-break/><text:span text:style-name="T1"> </text:span><text:span text:style-name="T2">(47/22) </text:span> ⲟⲗⲉ ⲛⲁⲓ̈ ⲉϯⲛⲁϫⲱⲃⲉ ⲙ̅ⲙⲟⲟⲩ· <text:line-break/><text:span text:style-name="T1"> </text:span><text:span text:style-name="T2">(47/23) </text:span> ⲧⲕⲗⲟⲟⲗⲉ ⲅⲁⲣ ⲙ̅ⲡ̅ⲡ̅ⲛⲁ̅ ⲉⲥϣⲟ‐ <text:line-break/><text:span text:style-name="T1"> </text:span><text:span text:style-name="T2">(47/24) </text:span> ⲟⲡ ⲛ̅ⲑⲉ ⲛ̅ⲟⲩⲃⲩⲣⲣⲩⲗⲗⲟⲥ ⲉⲧⲟⲩ‐ <text:line-break/><text:span text:style-name="T1"> </text:span><text:span text:style-name="T2">(47/25) </text:span> ⲁⲁⲃ· ⲁⲩⲱ ⲧⲕⲗⲟⲟⲗⲉ ⲙ̅ⲫⲩ‐ <text:line-break/><text:span text:style-name="T1"> </text:span><text:span text:style-name="T2">(47/26) </text:span> ⲙⲏⲛ ⲉⲥⲟ ⲛ̅ⲑⲉ ⲛ̅ⲛⲓⲥⲙⲁⲣⲁⲅ <text:line-break/><text:soft-page-break/><text:span text:style-name="T1"> </text:span><text:span text:style-name="T2">(47/27) </text:span> ⲇⲟⲥ ⲉⲧ’ⲡ̅ⲣ̅ⲣⲓ̈ⲱⲟⲩ· ⲁⲩⲱ ⲧⲕⲗⲟ‐ <text:line-break/><text:span text:style-name="T1"> </text:span><text:span text:style-name="T2">(47/28) </text:span> ⲟⲗⲉ ⲙ̅ⲡⲕⲁⲣⲱϥ ⲛ̅ⲑⲉ ⲛ̅ⲛⲓⲁⲙⲁ <text:line-break/><text:span text:style-name="T1"> </text:span><text:span text:style-name="T2">(47/29) </text:span> ⲣⲁⲛⲧⲟⲥ ⲉⲩⲣⲉϣⲣⲉϣ· ⲁⲩⲱ <text:line-break/><text:span text:style-name="T1"> </text:span><text:span text:style-name="T2">(47/30) </text:span> ⲧⲕⲗⲟⲟⲗⲉ ⲛ̅ⲧⲙⲉⲥⲟⲧⲏⲥ ⲛ̅ⲑⲉ‐ <text:line-break/><text:span text:style-name="T1"> </text:span><text:span text:style-name="T2">(47/31) </text:span> ⲛ̅ⲟⲩϩⲩⲁⲕⲓⲛⲑⲟⲥ ⲉⲧ’ⲧⲟⲩⲃⲏ‐ <text:line-break/><text:span text:style-name="T1"> </text:span><text:span text:style-name="T2">(47/32) </text:span> ⲟⲩ· ⲁⲩⲱ ⲛ̅ⲧⲁⲣⲉⲡⲇⲓⲕⲁⲓⲟⲥ <text:line-break/><text:span text:style-name="T1"> </text:span><text:span text:style-name="T2">(47/33) </text:span> ⲟⲩⲱⲛ̅ϩ̅ ⲉⲃⲟⲗ ϩ̅ⲛ̅ ⲧⲫⲩⲥⲓⲥ· <text:line-break/><text:span text:style-name="T1"> </text:span><text:span text:style-name="T2">(47/34) </text:span> ⲧⲟⲧⲉ ⲛ̅ⲧⲁⲣⲉⲧⲫⲩⲥⲓⲥ ⲛⲟⲩ‐ <text:line-break/><text:span text:style-name="T1"> </text:span><text:span text:style-name="T2">(47/35) </text:span> ϭⲉ ⲁⲥϯ ⲧⲕⲁⲥ· ⲁⲥⲣ̅ⲭⲁⲣⲓⲍⲉ <text:line-break/><text:span text:style-name="T1"> </text:span><text:span text:style-name="T2">(48/1) </text:span> ⲙ̅ⲙⲟⲣⲫⲁⲓⲁ ⲉⲧⲣⲉϥⲙⲟⲩϣ̅ⲧ̅ <text:line-break/><text:span text:style-name="T1"> </text:span><text:span text:style-name="T2">(48/2) </text:span> ⲛ̅ⲧⲡⲉ· ⲉⲡⲇⲓⲕⲁⲓⲟⲥ ⲙⲟⲩϣ̅ⲧ̅ <text:line-break/><text:span text:style-name="T1"> </text:span><text:span text:style-name="T2">(48/3) </text:span> ϩ̅ⲓ̅ⲧ̅ⲛ̅ ⲙⲛ̅ⲧ’̅ⲥⲛⲟⲟⲩⲥ ⲛ̅ⲕⲁⲓⲣⲟⲥ <text:line-break/><text:span text:style-name="T1"> </text:span><text:span text:style-name="T2">(48/4) </text:span> ⲉⲧⲣⲉϥⲙⲟϣⲧⲟⲩ ϩ̅ⲛ̅ ⲟⲩⲕⲁⲓ <text:line-break/><text:span text:style-name="T1"> </text:span><text:span text:style-name="T2">(48/5) </text:span> ⲣⲟⲥ ⲛ̅ⲟⲩⲱⲧ’· ϫⲉⲕⲁⲁⲥ ⲉⲡⲉϥ <text:line-break/><text:span text:style-name="T1"> </text:span><text:span text:style-name="T2">(48/6) </text:span> ⲕⲁⲓⲣⲟⲥ ⲛⲁϫⲱⲕ ⲉⲃⲟⲗ ϩ̅ⲛ̅ ⲟⲩ‐ <text:line-break/><text:span text:style-name="T1"> </text:span><text:span text:style-name="T2">(48/7) </text:span> ϭⲉⲡⲏ· ⲁⲩⲱ ⲛ̅ⲧⲉⲧⲫⲩⲥⲓⲥ <text:line-break/><text:span text:style-name="T1"> </text:span><text:span text:style-name="T2">(48/8) </text:span> ⲟⲩⲱⲥ̅ϥ̅· ϩⲉⲛⲙⲁⲕⲁⲣⲓⲟⲥ ⲛⲉ‐ <text:line-break/><text:span text:style-name="T1"> </text:span><text:span text:style-name="T2">(48/9) </text:span> ⲛⲉⲧⲁⲣⲉϩ ⲉⲣⲟⲟⲩ ⲉⲧⲡⲁⲣⲁ‐ <text:line-break/><text:span text:style-name="T1"> </text:span><text:span text:style-name="T2">(48/10) </text:span> ⲑⲏⲕⲏ ⲙ̅ⲡⲙⲟⲩ· ⲉⲧⲉ ⲡⲁⲓ̈ ⲡⲉ‐ <text:line-break/><text:span text:style-name="T1"> </text:span><text:span text:style-name="T2">(48/11) </text:span> ⲡⲙⲟⲟⲩ ⲛ̅ⲕⲁⲕⲉ ⲉⲧ̅ⲣ̅ⲃⲁⲣⲉⲓⲥⲑⲁⲓ· <text:line-break/><text:span text:style-name="T1"> </text:span><text:span text:style-name="T2">(48/12) </text:span> ⲉ〈ⲩ〉ⲛⲁϣϫⲣⲟ ⲅⲁⲣ ⲉⲣⲟⲟⲩ ⲁⲛ ϩ̅ⲛ̅ ϩ̅ⲛ̅ <text:line-break/><text:span text:style-name="T1"> </text:span><text:span text:style-name="T2">(48/13) </text:span> ⲕⲟⲩⲉⲓ ⲛ̅ⲭⲣⲟⲛⲟⲥ· ⲉⲩⲣ̅ⲉⲡⲓⲅⲉ‐ <text:line-break/><text:span text:style-name="T1"> </text:span><text:span text:style-name="T2">(48/14) </text:span> ⲁⲉ̅ⲓ̅ ⲉⲃⲟⲗ ϩ̅ⲛ̅ ⲧⲡⲗⲁⲛⲏ ⲙ̅ⲡⲕⲟⲥ‐ <text:line-break/><text:span text:style-name="T1"> </text:span><text:span text:style-name="T2">(48/15) </text:span> ⲙⲟⲥ· ⲁⲩⲱ ⲉⲩϣⲁⲛϫⲣⲟ ⲉⲣⲟⲟⲩ <text:line-break/><text:span text:style-name="T1"> </text:span><text:span text:style-name="T2">(48/16) </text:span> ⲥⲉⲛⲁⲣ̅ⲕⲱⲗⲩⲉ ⲙ̅ⲙⲟⲟⲩ ⲉⲣⲟⲟⲩ <text:line-break/><text:span text:style-name="T1"> </text:span><text:span text:style-name="T2">(48/17) </text:span> ⲥⲉⲛⲁⲣ̅ⲃⲁⲥⲁⲛⲓⲍⲉ ⲙ̅ⲙⲟⲟⲩ ϩ̅ⲙ̅ <text:line-break/><text:span text:style-name="T1"> </text:span><text:span text:style-name="T2">(48/18) </text:span> ⲡⲕⲁⲕⲉ ϣⲁ ⲡⲕⲁⲓⲣⲟⲥ ⲛ̅ⲧⲥⲩⲛ‐ <text:line-break/><text:span text:style-name="T1"> </text:span><text:span text:style-name="T2">(48/19) </text:span> ⲧⲉⲗⲉⲓⲁ· ϩⲟⲧⲁⲛ ⲉⲣϣⲁⲛⲧⲥⲩⲛ‐ <text:line-break/><text:span text:style-name="T1"> </text:span><text:span text:style-name="T2">(48/20) </text:span> ⲧⲉⲗⲉⲓⲁ ϣⲱⲡⲉ ⲛ̅ⲧⲉⲧⲫⲩⲥⲓⲥ <text:line-break/><text:span text:style-name="T1"> </text:span><text:span text:style-name="T2">(48/21) </text:span> ⲧⲁⲕⲟ· ⲧⲟⲧⲉ ⲛⲟⲩⲙⲉⲉⲩⲉ ⲛⲁ‐ <text:line-break/><text:span text:style-name="T1"> </text:span><text:span text:style-name="T2">(48/22) </text:span> ⲡⲱⲣ̅ϫ̅ ⲉⲡⲕⲁⲕⲉ· ⲛⲁⲓ̈ ⲁⲧ’ⲫⲩ‐ <text:line-break/><text:span text:style-name="T1"> </text:span><text:span text:style-name="T2">(48/23) </text:span> ⲥⲓⲥ ⲣ̅ⲃⲁⲣⲉⲓ ⲙ̅ⲙⲟⲟⲩ ⲡⲣⲟⲥ ⲟⲩ‐ <text:line-break/><text:span text:style-name="T1"> </text:span><text:span text:style-name="T2">(48/24) </text:span> ⲕⲟⲩⲉⲓ ⲛ̅ⲭⲣⲟⲛⲟⲥ· ⲁⲩⲱ ⲥⲉ‐ <text:line-break/><text:span text:style-name="T1"> </text:span><text:span text:style-name="T2">(48/25) </text:span> ⲛⲁϣⲱⲡⲉ ϩ̅ⲙ̅ ⲡⲟⲩⲟⲉⲓⲛ ⲉ‐ <text:line-break/><text:span text:style-name="T1"> </text:span><text:span text:style-name="T2">(48/26) </text:span> ⲙⲁⲩϣ̅ϣⲁϫⲉ ⲉⲣⲟϥ ⲛ̅ⲧⲉ ⲡ̅ⲡ̅ⲛ̅ⲁ̅ <text:line-break/><text:span text:style-name="T1"> </text:span><text:span text:style-name="T2">(48/27) </text:span> ⲛ̅ⲁⲅⲉⲛⲛⲏⲧⲟⲛ ⲉⲙ̅ⲛ̅ⲧⲁⲩ ⲙⲟⲣ‐ <text:line-break/><text:span text:style-name="T1"> </text:span><text:span text:style-name="T2">(48/28) </text:span> ⲫⲏ ⲙ̅ⲙⲁⲩ· ⲁⲩⲱ ⲧⲉⲓ̈ϩⲉ ⲧⲉ‐ <text:line-break/><text:span text:style-name="T1"> </text:span><text:span text:style-name="T2">(48/29) </text:span> ⲡⲛⲟⲩⲥ ⲛ̅ⲑⲉ ⲛ̅ⲧⲁⲉⲓϫⲟⲟⲥ ϫⲓⲛ <text:line-break/><text:span text:style-name="T1"> </text:span><text:span text:style-name="T2">(48/30) </text:span> ⲛ̅ϣⲟⲣ̅ⲡ̅· ϫⲓⲛⲡⲓⲛⲁⲩ ⲙⲟⲟϣⲉ <text:line-break/><text:span text:style-name="T1"> </text:span><text:span text:style-name="T2">(48/31) </text:span> ⲱ̅ ⲥⲏⲉⲙ ϩ̅ⲛ̅ ⲟⲩⲭⲁⲣⲓⲥ ⲛ̅ⲅ̅ϭⲱ 5̅0ϩ[ⲛ̅50] <text:line-break/><text:span text:style-name="T1"> </text:span><text:span text:style-name="T2">(48/32) </text:span> ⲧⲡⲓⲥⲧⲓⲥ ϩ̅ⲓ̅ϫ̅ⲙ̅ ⲡⲕⲁϩ· ⲇⲩⲛⲁⲙ[ⲓⲥ] <text:line-break/><text:span text:style-name="T1"> </text:span><text:span text:style-name="T2">(48/33) </text:span> ⲅⲁⲣ ⲛⲓⲙ ⲛ̅ⲟⲩⲟⲉⲓⲛ ⲁⲩⲱ ⲛ̅ⲕⲱ̣ <text:line-break/><text:span text:style-name="T1"> </text:span><text:span text:style-name="T2">(48/34) </text:span> ϩ̅ⲧ̅’̅ ⲥⲉⲛⲁϫⲱⲕ ⲉⲃⲟⲗ ϩ̅ⲓ̅ⲧⲟⲟⲧ’ <text:line-break/><text:span text:style-name="T1"> </text:span><text:span text:style-name="T2">(49/1) </text:span> ⲉⲧⲃⲏⲏⲧ̅ⲕ̅ ⲛ̅ⲟⲩⲉϣ ⲛ̅ⲃ̅ⲗ̅ⲗⲁⲕ <text:line-break/><text:span text:style-name="T1"> </text:span><text:span text:style-name="T2">(49/2) </text:span> ⲅⲁⲣ ⲥⲉⲛⲁϭⲟⲗⲡⲟⲩ ⲁⲛ ⲉⲃⲟⲗ ϣⲁⲛ‐ <text:line-break/><text:span text:style-name="T1"> </text:span><text:span text:style-name="T2">(49/3) </text:span> ⲧⲉⲕϫⲟⲟⲩ ϩ̅ⲛ̅ ⲟⲩⲫⲁⲛⲉⲣⲟⲛ· <text:line-break/><text:span text:style-name="T1"> </text:span><text:span text:style-name="T2">(49/4) </text:span> ⲉⲕϣⲁⲛⲗⲟ ϩ̅ⲓ̅ϫ̅ⲙ̅ ⲡⲕⲁϩ ⲥⲉⲛⲁ‐ <text:line-break/><text:soft-page-break/><text:span text:style-name="T1"> </text:span><text:span text:style-name="T2">(49/5) </text:span> ⲧⲁⲁⲩ ⲛ̅ⲛ̅ⲁⲝⲓⲟⲥ· ⲙ̅ⲡⲃⲟⲗ ⲛ̅ⲧⲉⲓ̈ <text:line-break/><text:span text:style-name="T1"> </text:span><text:span text:style-name="T2">(49/6) </text:span> ⲫⲁⲛⲉⲣⲱⲥⲓⲥ ⲇⲉ ⲙⲁⲣⲟⲩϣⲁϫⲉ <text:line-break/><text:span text:style-name="T1"> </text:span><text:span text:style-name="T2">(49/7) </text:span> ⲉⲣⲟⲕ ϩ̅ⲓ̅ϫ̅ⲙ̅ ⲡⲕⲁϩ· ⲉⲡⲓⲇⲏ ⲥⲉⲛⲁ‐ <text:line-break/><text:span text:style-name="T1"> </text:span><text:span text:style-name="T2">(49/8) </text:span> ϥⲓ ⲙ̅ⲡ̅ⲧⲟ ⲉⲧⲉⲥⲓⲱⲟⲩ· ⲁⲩⲱ ⲉⲧ̅ⲣ̅‐ <text:line-break/><text:span text:style-name="T1"> </text:span><text:span text:style-name="T2">(49/9) </text:span> ⲥⲩⲙⲫⲱⲛⲓ ʹ26 </text:p>
      <text:p text:style-name="P1"/>
      <text:p text:style-name="P3">( codex VII ) The Second Treatise of the Great Seth</text:p>
      <text:p text:style-name="P2"><text:span text:style-name="T1"> </text:span><text:span text:style-name="T2">(49/10) </text:span> ⲉϥⲙⲟⲧ̅ⲛ̅ ⲇⲉ ⲙ̅ⲙⲟϥ ⲛ̅ϭⲓ ⲡⲙⲉ‐ <text:line-break/><text:span text:style-name="T1"> </text:span><text:span text:style-name="T2">(49/11) </text:span> ⲅⲉⲑⲟⲥ ⲉⲧϫⲏⲕ ϩⲣⲁⲓ̈ ϩ̅ⲙ̅ ⲡⲓⲟⲩ‐ <text:line-break/><text:span text:style-name="T1"> </text:span><text:span text:style-name="T2">(49/12) </text:span> ⲟⲉⲓⲛ ⲛ̅ⲁⲧϣⲁϫⲉ ⲙ̅ⲙⲟϥ· ⲛ̅ϩⲣⲁⲓ̈ <text:line-break/><text:span text:style-name="T1"> </text:span><text:span text:style-name="T2">(49/13) </text:span> ϩ̅ⲛ̅ ⲟⲩⲙ̅ⲛ̅ⲧⲙⲉ ⲛ̅ⲧⲉ ⲧⲙⲁⲁⲩ <text:line-break/><text:span text:style-name="T1"> </text:span><text:span text:style-name="T2">(49/14) </text:span> ⲛ̅ⲧⲉ ⲛⲁⲓ̈ ⲧⲏⲣⲟⲩ· ⲁⲩⲱ ⲛ̅ⲧⲱⲧ̅ⲛ̅ <text:line-break/><text:span text:style-name="T1"> </text:span><text:span text:style-name="T2">(49/15) </text:span> ⲧⲏⲣⲧ̅ⲛ̅· ⲉⲁⲛⲟⲕ ⲟⲩⲁⲁⲧ ⲉⲧⲟ ⲛ̅‐ <text:line-break/><text:span text:style-name="T1"> </text:span><text:span text:style-name="T2">(49/16) </text:span> ⲧⲉⲗⲓⲟⲥ· ⲛⲏ ⲉⲧⲡⲏϩ ⲉⲣⲟⲓ̈ ⲉⲧⲃⲉ <text:line-break/><text:span text:style-name="T1"> </text:span><text:span text:style-name="T2">(49/17) </text:span> ⲡⲓϣⲁϫⲉ· ⲉⲓ̈ϣⲟⲟⲡ ⲅⲁⲣ ⲙ̅ⲛ̅ ϯⲙ̅ⲛ̅‐ <text:line-break/><text:span text:style-name="T1"> </text:span><text:span text:style-name="T2">(49/18) </text:span> ⲧⲛⲟϭ ⲧⲏⲣ̅ⲥ̅ ⲛ̅ⲧⲉ ⲡⲓⲡ̅ⲛⲁ̅ ⲉⲧⲉ ⲛ̅‐ <text:line-break/><text:span text:style-name="T1"> </text:span><text:span text:style-name="T2">(49/19) </text:span> ϣⲃⲏⲣ ⲛ̅ⲙ̅ⲙⲁⲛ· ⲙ̅ⲛ̅ ϩⲉⲛϣⲃⲏⲣ <text:line-break/><text:span text:style-name="T1"> </text:span><text:span text:style-name="T2">(49/20) </text:span> ⲛ̅ⲧⲱϭⲉ ϩ̅ⲛ̅ ⲟⲩϣⲱϣ· ⲉⲁⲓ̈ⲉⲓⲛⲉ <text:line-break/><text:span text:style-name="T1"> </text:span><text:span text:style-name="T2">(49/21) </text:span> ⲉⲃⲟⲗ ⲛ̅ⲟⲩϣⲁϫⲉ· ⲁⲩⲉⲟⲟⲩ ⲛ̅‐ <text:line-break/><text:span text:style-name="T1"> </text:span><text:span text:style-name="T2">(49/22) </text:span> ⲧⲉ ⲡⲉⲛⲉⲓⲱⲧ ⲉⲃⲟⲗ ϩ̅ⲓ̅ⲧⲟⲟⲧ̅ⲥ̅ <text:line-break/><text:span text:style-name="T1"> </text:span><text:span text:style-name="T2">(49/23) </text:span> ⲛ̅ⲧⲉϥⲙ̅ⲛ̅ⲧ̅ⲭⲣ̅ⲥ̅ ⲙ̅ⲛ̅ ⲟⲩⲙⲉ‐ <text:line-break/><text:span text:style-name="T1"> </text:span><text:span text:style-name="T2">(49/24) </text:span> ⲉⲩⲉ ⲛ̅ⲛⲁⲧⲱϫ̅ⲛ̅ ⲛ̅ϭⲓ ⲡⲓϣⲁϫⲉ‐ <text:line-break/><text:span text:style-name="T1"> </text:span><text:span text:style-name="T2">(49/25) </text:span> ⲉⲧϣⲟⲟⲡ ⲛ̅ϩⲏⲧ̅ϥ̅· ⲟⲩⲙⲛ̅ⲧ̅ <text:line-break/><text:span text:style-name="T1"> </text:span><text:span text:style-name="T2">(49/26) </text:span> ϩ̅ⲙ̅ϩⲁⲗ ⲧⲉ ϫⲉ ⲧ̅ⲛ̅ⲛⲁⲙⲟⲩ ⲙ̅ⲛ̅ <text:line-break/><text:span text:style-name="T1"> </text:span><text:span text:style-name="T2">(49/27) </text:span> ⲡⲉⲭ̅ⲥ̅ ⲙ̅ⲛ̅ ⲟⲩⲙⲉⲉⲩⲉ ⲛ̅ⲛⲁⲧ <text:line-break/><text:span text:style-name="T1"> </text:span><text:span text:style-name="T2">(49/28) </text:span> ⲱϫ̅ⲛ̅ ⲁⲩⲱ ⲛ̅ⲁⲧϫⲱϩ̅ⲙ̅· ⲟⲩ‐ <text:line-break/><text:span text:style-name="T1"> </text:span><text:span text:style-name="T2">(49/29) </text:span> ϣⲡⲏⲣⲉ ⲛ̅ⲁⲧⲧⲁϩⲟⲥ· ⲡⲓⲥϩⲁⲓ̈ <text:line-break/><text:span text:style-name="T1"> </text:span><text:span text:style-name="T2">(49/30) </text:span> ⲛ̅ⲧⲉ ⲡⲓⲙⲟⲟⲩ ⲛ̅ⲁⲧϣⲁϫⲉ ⲉ‐ <text:line-break/><text:span text:style-name="T1"> </text:span><text:span text:style-name="T2">(49/31) </text:span> ⲧⲃⲏⲏⲧ̅ϥ̅· ⲉⲧⲉ ⲉⲃⲟⲗ ⲙ̅ⲙⲟⲛ‐ <text:line-break/><text:span text:style-name="T1"> </text:span><text:span text:style-name="T2">(49/32) </text:span> ⲡⲉ ⲡⲓϣⲁϫⲉ· ⲁⲛⲟⲕ ⲉⲧϩ̅ⲛ̅ <text:line-break/><text:span text:style-name="T1"> </text:span><text:span text:style-name="T2">(49/33) </text:span> ⲧⲏⲛⲉ· ⲁⲩⲱ ⲛ̅ⲧⲱⲧ̅ⲛ̅ ⲧⲉⲧ̅ⲛ̅‐ <text:line-break/><text:span text:style-name="T1"> </text:span><text:span text:style-name="T2">(49/34) </text:span> ϣⲟⲟⲡ ⲛ̅ϩⲏⲧ· ⲛ̅ⲑⲉ ⲉⲧⲉ ⲡⲓ‐ <text:line-break/><text:span text:style-name="T1"> </text:span><text:span text:style-name="T2">(49/35) </text:span> ⲱⲧ ϣⲟⲟⲡ ⲛ̅ϩⲏⲧⲧⲏⲛⲉ ϩ̅ⲛ̅ <text:line-break/><text:span text:style-name="T1"> </text:span><text:span text:style-name="T2">(50/1) </text:span> ⲟⲩⲙ̅ⲛ̅ⲧ̅ⲁⲧⲕⲁϭⲓⲁ· ⲙⲁⲣ̅ⲛ̅ⲥⲱ‐ <text:line-break/><text:span text:style-name="T1"> </text:span><text:span text:style-name="T2">(50/2) </text:span> ⲟⲩϩ ⲛ̅ⲟⲩⲉⲕⲕⲗⲏⲥⲓⲁ ⲉⲩⲙⲁ <text:line-break/><text:span text:style-name="T1"> </text:span><text:span text:style-name="T2">(50/3) </text:span> ⲙⲁⲣ̅ⲛ̅ⲙⲟⲩϣ̅ⲧ̅ ⲙ̅ⲡⲓⲥⲱⲛ̅ⲧ̅ <text:line-break/><text:span text:style-name="T1"> </text:span><text:span text:style-name="T2">(50/4) </text:span> ⲉⲧⲛ̅ⲧⲁϥ· ⲙⲁⲣ̅ⲛ̅ⲧⲁⲩⲟ ⲛ̅ⲟⲩⲁ <text:line-break/><text:span text:style-name="T1"> </text:span><text:span text:style-name="T2">(50/5) </text:span> ⲉⲃⲟⲗ ⲛ̅ϩⲏⲧ̅ϥ̅· ⲛ̅ⲑⲉ ⲛ̅ⲧⲁϥⲙⲟⲩ‐ <text:line-break/><text:span text:style-name="T1"> </text:span><text:span text:style-name="T2">(50/6) </text:span> ϣ̅ⲧ̅ ⲛ̅〈ⲛⲓ〉ⲉⲛⲟⲓⲁ ⲛⲓⲙⲉⲣⲟⲥ ⲉⲧ‐ <text:line-break/><text:span text:style-name="T1"> </text:span><text:span text:style-name="T2">(50/7) </text:span> ⲥⲁⲡⲉⲥⲏⲧ· ⲛ̅ⲧⲁⲉⲓϫⲉ ⲛⲁⲓ̈ ⲇⲉ <text:line-break/><text:span text:style-name="T1"> </text:span><text:span text:style-name="T2">(50/8) </text:span> ⲙ̅ⲡⲁϣⲁⲉⲓ ⲧⲏⲣ̅ϥ̅ ⲛ̅ⲧⲉ ϯⲉⲕ‐ <text:line-break/><text:span text:style-name="T1"> </text:span><text:span text:style-name="T2">(50/9) </text:span> ⲕⲗⲏⲥⲓⲁ ⲉⲧⲟϣ ⲛ̅ⲧⲉ ⲡⲓⲙⲉⲅⲉ‐ <text:line-break/><text:span text:style-name="T1"> </text:span><text:span text:style-name="T2">(50/10) </text:span> ⲑⲟⲥ ⲉⲧⲧⲉⲗⲏⲗ· ⲁⲩⲧⲉⲗⲏⲗ ⲙ̅‐ <text:line-break/><text:span text:style-name="T1"> </text:span><text:span text:style-name="T2">(50/11) </text:span> ⲙⲟⲟⲩ ⲛ̅ϭⲓ ⲡⲏⲓ̈ ⲧⲏⲣ̅ϥ̅ ⲙ̅ⲡⲓⲱⲧ <text:line-break/><text:span text:style-name="T1"> </text:span><text:span text:style-name="T2">(50/12) </text:span> ⲛ̅ⲧⲉ ϯⲙ̅ⲛ̅ⲧⲙⲉ· ⲉⲁⲛⲟⲕ ⲡⲉ ⲡⲓ‐ <text:line-break/><text:span text:style-name="T1"> </text:span><text:span text:style-name="T2">(50/13) </text:span> ⲉⲃⲟⲗ ⲛ̅ϩⲏⲧⲟⲩ· ⲁⲓ̈ϯ ⲛ̅ʹ264ⲟⲩⲙⲉ <text:line-break/><text:span text:style-name="T1"> </text:span><text:span text:style-name="T2">(50/14) </text:span> ⲉⲩⲉ ⲉⲧⲃⲉ ⲛⲓⲉⲛⲛⲟⲓⲁ ⲛ̅ⲧⲁⲩⲉⲓ <text:line-break/><text:span text:style-name="T1"> </text:span><text:span text:style-name="T2">(50/15) </text:span> ⲉⲃⲟⲗ ϩ̅ⲙ̅ ⲡⲓⲡ̅ⲛⲁ̅ ⲛ̅ⲁⲧϫⲱϩ̅ⲙ̅ <text:line-break/><text:span text:style-name="T1"> </text:span><text:span text:style-name="T2">(50/16) </text:span> ⲉⲧⲃⲉ ⲡⲓⲉⲓ ⲉⲡⲉⲥⲏⲧ ⲉϫ̅ⲙ̅ ⲡⲓⲙⲟ‐ <text:line-break/><text:span text:style-name="T1"> </text:span><text:span text:style-name="T2">(50/17) </text:span> ⲟⲩ ⲛ̅ϭⲓ ⲛⲓⲙⲉⲣⲟⲥ ⲉⲧⲥⲁⲡⲉ‐ <text:line-break/><text:span text:style-name="T1"> </text:span><text:span text:style-name="T2">(50/18) </text:span> ⲥⲏⲧ· ⲁⲩⲱ ⲁⲩⲉⲛⲛⲟⲓⲁ ⲛ̅ⲟⲩ‐ <text:line-break/><text:span text:style-name="T1"> </text:span><text:span text:style-name="T2">(50/19) </text:span> ⲱⲧ ϣⲱⲡⲉ ⲛⲁⲩ ⲧⲏⲣⲟⲩ ⲉⲥ‐ <text:line-break/><text:span text:style-name="T1"> </text:span><text:span text:style-name="T2">(50/20) </text:span> ϣⲟⲟⲡ ⲉⲃⲟⲗ ϩ̅ⲛ̅ ⲟⲩⲁ ⲁⲩⲣ̅ⲇⲟ‐ <text:line-break/><text:span text:style-name="T1"> </text:span><text:span text:style-name="T2">(50/21) </text:span> ⲅⲙⲁⲧⲓⲍⲉ ⲙ̅ⲙⲟⲓ̈ ⲉⲓ̈ⲟⲩⲱϣⲉ <text:line-break/><text:soft-page-break/><text:span text:style-name="T1"> </text:span><text:span text:style-name="T2">(50/22) </text:span> ⲁⲓ̈ⲉ̅ⲓ̅ ⲉⲃⲟⲗ· ⲉⲟⲩⲱⲛ̅ϩ̅ ⲉⲃⲟⲗ ⲙ̅‐ <text:line-break/><text:span text:style-name="T1"> </text:span><text:span text:style-name="T2">(50/23) </text:span> ⲡⲓⲉⲟⲟⲩ ⲛ̅ⲛⲁϣⲃⲏⲣ ⲛ̅ⲧⲱϭⲉ <text:line-break/><text:span text:style-name="T1"> </text:span><text:span text:style-name="T2">(50/24) </text:span> ⲙ̅ⲛ̅ ⲛⲁϣⲃⲏⲣ ⲙ̅ⲡ̅ⲛⲁ̅· ⲛⲉⲁⲩ <text:line-break/><text:span text:style-name="T1"> </text:span><text:span text:style-name="T2">(50/25) </text:span> ⲥⲟⲃⲧⲉ ⲅⲁⲣ ⲛ̅ⲛⲏ ⲉⲧⲉ ⲛⲉⲩϣⲟ‐ <text:line-break/><text:span text:style-name="T1"> </text:span><text:span text:style-name="T2">(50/26) </text:span> ⲟⲡ ϩ̅ⲙ̅ ⲡⲓⲕⲟⲥⲙⲟⲥ· ϩ̅ⲛ̅ ⲟⲩⲱϣⲉ <text:line-break/><text:span text:style-name="T1"> </text:span><text:span text:style-name="T2">(50/27) </text:span> ⲛ̅ⲧⲉ ϯⲥⲟⲫⲓⲁ ⲧ̅ⲛ̅ⲥⲱⲛⲉ ⲧⲏ <text:line-break/><text:span text:style-name="T1"> </text:span><text:span text:style-name="T2">(50/28) </text:span> ⲉⲧⲉ ⲛⲟⲩⲡⲣⲟⲛⲓⲕⲟⲥ ⲧⲉ· ⲉ‐ <text:line-break/><text:span text:style-name="T1"> </text:span><text:span text:style-name="T2">(50/29) </text:span> ⲧⲃⲉ ϯⲙ̅ⲛ̅ⲧ̅ⲁⲧⲕⲁϭⲓⲁ ⲉⲧⲉ ⲙ̅‐ <text:line-break/><text:span text:style-name="T1"> </text:span><text:span text:style-name="T2">(50/30) </text:span> ⲡⲟⲩⲧⲁⲟⲩⲟⲥ· ⲟⲩⲧⲉ ⲙ̅ⲡⲉⲥ‐ <text:line-break/><text:span text:style-name="T1"> </text:span><text:span text:style-name="T2">(50/31) </text:span> ⲣ̅ⲁⲓⲧⲓ ⲛ̅ⲗⲁⲁⲩ ⲛ̅ⲧⲟⲟⲧ̅ϥ̅ ⲙ̅ⲡⲓ‐ <text:line-break/><text:span text:style-name="T1"> </text:span><text:span text:style-name="T2">(50/32) </text:span> ⲡⲧⲏⲣ̅ϥ̅· ⲙ̅ⲛ̅ ϯⲙ̅ⲛⲧ̅ⲛⲟϭ ⲛ̅‐ <text:line-break/><text:span text:style-name="T1"> </text:span><text:span text:style-name="T2">(50/33) </text:span> ⲧⲉ ϯⲉⲕⲕⲗⲏⲥⲓⲁ ⲙ̅ⲛ̅ ⲡⲓⲡⲗⲏ‐ <text:line-break/><text:span text:style-name="T1"> </text:span><text:span text:style-name="T2">(50/34) </text:span> ⲣⲱⲙⲁ ⲉⲁⲥⲣ̅ϣⲟⲣ̅ⲡ̅ ⲁⲥⲉ̅ⲓ̅ ⲉⲃⲟⲗ <text:line-break/><text:span text:style-name="T1"> </text:span><text:span text:style-name="T2">(51/1) </text:span> ⲉⲥⲟⲃⲧⲉ ⲛ̅ϩⲉⲛⲙⲟⲛⲁⲥ ⲙ̅ⲛ̅ <text:line-break/><text:span text:style-name="T1"> </text:span><text:span text:style-name="T2">(51/2) </text:span> ϩⲉⲛⲧⲟⲡⲟⲥ ⲙ̅ⲡϣⲏⲣⲉ ⲙ̅ⲡⲟⲩ‐ <text:line-break/><text:span text:style-name="T1"> </text:span><text:span text:style-name="T2">(51/3) </text:span> ⲟⲉⲓⲛ· ⲁⲩⲱ ⲛⲓϣⲃⲏⲣ ⲛ̅ⲣⲉϥⲣ̅ <text:line-break/><text:span text:style-name="T1"> </text:span><text:span text:style-name="T2">(51/4) </text:span> ϩⲱⲃ ⲛ̅ⲧⲁⲥϫⲓⲧⲟⲩ ⲉⲃⲟⲗ ϩ̅ⲓ̅ⲧⲟ‐ <text:line-break/><text:span text:style-name="T1"> </text:span><text:span text:style-name="T2">(51/5) </text:span> ⲟⲧⲟⲩ ⲛ̅ⲛⲓⲥⲧⲟⲓⲭⲉⲓⲟⲛ ⲉⲧⲥⲁ‐ <text:line-break/><text:span text:style-name="T1"> </text:span><text:span text:style-name="T2">(51/6) </text:span> ⲡⲉⲥⲏⲧ· ⲉⲩⲕⲱⲧ ⲛ̅ⲧⲉ ⲛⲓⲏⲉⲓ· <text:line-break/><text:span text:style-name="T1"> </text:span><text:span text:style-name="T2">(51/7) </text:span> ⲛ̅ⲥⲱⲙⲁⲧⲓⲕⲟⲛ ⲛ̅ⲧⲟⲟⲧⲟⲩ· <text:line-break/><text:span text:style-name="T1"> </text:span><text:span text:style-name="T2">(51/8) </text:span> ⲛ̅ⲧⲟⲟⲩ ⲇⲉ ⲉⲁⲩϣⲱⲡⲉ ϩ̅ⲛ̅ ⲟⲩ‐ <text:line-break/><text:span text:style-name="T1"> </text:span><text:span text:style-name="T2">(51/9) </text:span> ⲉ〈ⲟ〉ⲟⲩ ⲉϥϣⲟⲩⲉⲓⲧ ⲁⲩϫⲱⲕ <text:line-break/><text:span text:style-name="T1"> </text:span><text:span text:style-name="T2">(51/10) </text:span> ⲉⲃⲟⲗ ⲉϩⲣⲁⲓ̈ ⲉⲩⲧⲁⲕⲟ· ϩ̅ⲛ̅ ⲛⲓⲏⲓ̈ <text:line-break/><text:span text:style-name="T1"> </text:span><text:span text:style-name="T2">(51/11) </text:span> ⲛ̅ⲧⲁⲩϣⲱⲡⲉ ⲛ̅ϩⲏⲧⲟⲩ ⲉⲩⲥⲟⲃ‐ <text:line-break/><text:span text:style-name="T1"> </text:span><text:span text:style-name="T2">(51/12) </text:span> ⲧⲉ ⲙ̅ⲙⲟⲟⲩ ⲉⲃⲟⲗ ϩ̅ⲓ̅ⲧⲟⲟⲧ̅ⲥ̅ ⲛ̅‐ <text:line-break/><text:span text:style-name="T1"> </text:span><text:span text:style-name="T2">(51/13) </text:span> ϯⲥⲟⲫⲓⲁ· ϣⲁⲩϣⲱⲡⲉ ⲉⲩⲥ̅ⲃ̅†‐ <text:line-break/><text:span text:style-name="T1"> </text:span><text:span text:style-name="T2">(51/14) </text:span> ⲧⲱⲧ ϫⲉ ⲉⲩⲉϣⲱⲡ ⲉⲣⲟⲟⲩ ⲙ̅‐ <text:line-break/><text:span text:style-name="T1"> </text:span><text:span text:style-name="T2">(51/15) </text:span> ⲡⲓϣⲁϫⲉ ⲛ̅ⲣⲉϥⲧⲁⲛϩⲟ ⲛ̅ⲧⲉ ϯ <text:line-break/><text:span text:style-name="T1"> </text:span><text:span text:style-name="T2">(51/16) </text:span> ⲙⲟⲛⲁⲥ ⲛ̅ⲛⲁⲧϣⲁϫⲉ ⲙ̅ⲙⲟⲥ <text:line-break/><text:span text:style-name="T1"> </text:span><text:span text:style-name="T2">(51/17) </text:span> ⲙ̅ⲛ̅ ϯⲙⲛ̅ⲧ̅ⲛⲟϭ ⲛ̅ⲧⲉ ϯⲉⲕⲕⲗⲏ‐ <text:line-break/><text:span text:style-name="T1"> </text:span><text:span text:style-name="T2">(51/18) </text:span> ⲥⲓⲁ· ⲛ̅ⲧⲉ ⲛⲁⲓ̈ ⲧⲏⲣⲟⲩ ⲉⲧϭⲱ‐ <text:line-break/><text:span text:style-name="T1"> </text:span><text:span text:style-name="T2">(51/19) </text:span> ϣ̅ⲧ̅ ⲉⲃⲟⲗ· ⲙ̅ⲛ̅ ⲛⲏ ⲉⲧϣⲟⲟⲡ <text:line-break/><text:span text:style-name="T1"> </text:span><text:span text:style-name="T2">(51/20) </text:span> ⲛ̅ϩⲏⲧ· ⲁⲉⲓⲙⲟⲩϣ̅ⲧ̅ ⲛ̅ⲟⲩⲏⲉⲓ <text:line-break/><text:span text:style-name="T1"> </text:span><text:span text:style-name="T2">(51/21) </text:span> ⲛ̅ⲥⲱⲙⲁⲧⲓⲕⲟⲛ ⲁⲉⲓⲛⲟⲩϫⲉ <text:line-break/><text:span text:style-name="T1"> </text:span><text:span text:style-name="T2">(51/22) </text:span> ⲉⲃⲟⲗ ⲙ̅ⲡⲏ ⲉⲧⲉ ⲛⲉϥϣⲟⲟⲡ <text:line-break/><text:span text:style-name="T1"> </text:span><text:span text:style-name="T2">(51/23) </text:span> ⲛ̅ϩⲏⲧ̅ϥ̅ ⲛ̅ϣⲟⲣ̅ⲡ̅· ⲁⲩⲱ ⲁⲛⲟⲕ <text:line-break/><text:span text:style-name="T1"> </text:span><text:span text:style-name="T2">(51/24) </text:span> ⲁⲉⲓⲃⲱⲕ ⲉϩⲟⲩⲛ· ⲁⲩⲱ ⲁⲩ‐ <text:line-break/><text:span text:style-name="T1"> </text:span><text:span text:style-name="T2">(51/25) </text:span> ϣⲧⲟⲣⲧ̅ⲣ̅ ⲛ̅ϭⲓ ⲡⲁϣⲁⲓ̈ ⲧⲏⲣ̅ϥ̅‐ <text:line-break/><text:span text:style-name="T1"> </text:span><text:span text:style-name="T2">(51/26) </text:span> ⲛ̅ⲧⲉ ⲛⲓⲁⲣⲭⲱⲛ· ⲁⲩⲱ ϯϩⲩ‐ <text:line-break/><text:span text:style-name="T1"> </text:span><text:span text:style-name="T2">(51/27) </text:span> ⲗⲏ ⲧⲏⲣ̅ⲥ̅ ⲛ̅ⲧⲉ ⲛⲓⲁⲣⲭⲱⲛ· <text:line-break/><text:span text:style-name="T1"> </text:span><text:span text:style-name="T2">(51/28) </text:span> ⲁⲩⲱ ⲙ̅ⲛ̅ ⲛⲓϭⲁⲙ ⲛ̅ϫⲡⲟ ⲙ̅ⲡⲕⲁϩ· <text:line-break/><text:span text:style-name="T1"> </text:span><text:span text:style-name="T2">(51/29) </text:span> ⲛⲉⲥϣⲟⲟⲡ ϩ̅ⲛ̅ ⲟⲩⲥⲧⲱⲧ ⲉⲥ‐ <text:line-break/><text:span text:style-name="T1"> </text:span><text:span text:style-name="T2">(51/30) </text:span> ⲛⲁⲩ ⲉⲡⲓⲉⲓⲛⲉ ⲛ̅ⲧⲉ ϯϩ̅ⲓ̅ⲕⲱⲛ· <text:line-break/><text:span text:style-name="T1"> </text:span><text:span text:style-name="T2">(51/31) </text:span> ⲉⲥⲙⲟϫ̅ⲕ̅· ⲁⲛⲟⲕ ⲇⲉ ⲡⲏ ⲉⲛⲉϥ‐ <text:line-break/><text:span text:style-name="T1"> </text:span><text:span text:style-name="T2">(51/32) </text:span> ϣⲟⲟⲡ ⲛ̅ϩⲏⲧ̅ⲥ̅· ⲉⲛϥⲓⲛⲉ ⲁⲛ‐ <text:line-break/><text:span text:style-name="T1"> </text:span><text:span text:style-name="T2">(51/33) </text:span> ⲙ̅ⲡⲏ ⲉⲛⲉϥϣⲟⲟⲡ ⲛ̅ϩⲏⲧ̅ϥ̅ <text:line-break/><text:span text:style-name="T1"> </text:span><text:span text:style-name="T2">(51/34) </text:span> ⲛ̅ϣⲟⲣ̅ⲡ̅· ⲡⲏ ⲅⲁⲣ ⲛⲉⲩⲣⲱⲙⲉ <text:line-break/><text:soft-page-break/><text:span text:style-name="T1"> </text:span><text:span text:style-name="T2">(52/1) </text:span> ⲛ̅ⲕⲟⲥⲙⲓⲕⲟⲥ ⲡⲉ· ⲁⲛⲟⲕ ⲇⲉ <text:line-break/><text:span text:style-name="T1"> </text:span><text:span text:style-name="T2">(52/2) </text:span> ⲉⲁⲛⲟⲕ ⲟⲩⲉⲃⲟⲗ ⲙ̅ⲡⲥⲁⲛⲧⲡⲉ <text:line-break/><text:span text:style-name="T1"> </text:span><text:span text:style-name="T2">(52/3) </text:span> ⲛ̅ⲛ̅ⲙ̅ⲡⲏⲩⲉ· ⲙ̅ⲡⲓⲣ̅ⲁⲣⲛⲉⲥⲑⲁⲓ <text:line-break/><text:span text:style-name="T1"> </text:span><text:span text:style-name="T2">(52/4) </text:span> ⲙⲉⲛ ⲛⲁⲩ· ⲁⲩⲱ ⲉⲧⲣⲁϣⲱⲡⲉ <text:line-break/><text:span text:style-name="T1"> </text:span><text:span text:style-name="T2">(52/5) </text:span> ⲛ̅ⲟⲩⲭⲣ̅ⲥ̅· ⲙ̅ⲡⲓⲟⲩⲱⲛ̅ϩ̅ ⲇⲉ ⲙ̅‐ <text:line-break/><text:span text:style-name="T1"> </text:span><text:span text:style-name="T2">(52/6) </text:span> ⲙⲟⲓ̈ ⲉⲃⲟⲗ ⲉⲣⲟⲟⲩ ϩ̅ⲛ̅ ϯⲁⲅⲁⲡⲏ <text:line-break/><text:span text:style-name="T1"> </text:span><text:span text:style-name="T2">(52/7) </text:span> ⲉⲧⲉ ⲛⲉⲥⲛ̅ⲛⲏⲩ ⲉⲃⲟⲗ ⲛ̅ϩⲏⲧ· <text:line-break/><text:span text:style-name="T1"> </text:span><text:span text:style-name="T2">(52/8) </text:span> ⲛⲉⲓⲟⲩⲟⲛ̅ϩ̅ ⲉⲃⲟⲗ ϫⲉ ⲁⲛⲟⲕ ⲟⲩ‐ <text:line-break/><text:span text:style-name="T1"> </text:span><text:span text:style-name="T2">(52/9) </text:span> ϣ̅ⲙ̅ⲙⲟ ⲛ̅ⲧⲉ ⲛⲓⲙⲉⲣⲟⲥ ⲉⲧⲥⲁ‐ <text:line-break/><text:span text:style-name="T1"> </text:span><text:span text:style-name="T2">(52/10) </text:span> ⲡⲉⲥⲏⲧ· ⲛⲉⲩⲛ̅ ⲟⲩⲛⲟϭ ⲛ̅‐ <text:line-break/><text:span text:style-name="T1"> </text:span><text:span text:style-name="T2">(52/11) </text:span> ϣⲧⲟⲣⲧ̅ⲣ̅ ϣⲟⲟⲡ ϩ̅ⲙ̅ ⲡⲓⲧⲟⲡⲟⲥ <text:line-break/><text:span text:style-name="T1"> </text:span><text:span text:style-name="T2">(52/12) </text:span> ⲧⲏⲣ̅ϥ̅ ⲛ̅ⲕⲟⲥⲙⲓⲕⲟⲛ ⲙ̅ⲛ̅ ⲟⲩ‐ <text:line-break/><text:span text:style-name="T1"> </text:span><text:span text:style-name="T2">(52/13) </text:span> ⲧⲱϩ ⲙ̅ⲛ̅ ⲟⲩⲡⲱⲧ· ⲁⲩⲱ ⲡⲓϣⲟ‐ <text:line-break/><text:span text:style-name="T1"> </text:span><text:span text:style-name="T2">(52/14) </text:span> ϫⲛⲉ ⲛ̅ⲧⲉ ⲛⲓⲁⲣⲭⲱⲛ· ϩⲟⲉⲓⲛⲉ <text:line-break/><text:span text:style-name="T1"> </text:span><text:span text:style-name="T2">(52/15) </text:span> ⲇⲉ ⲛⲉⲩⲧⲏⲧ ⲛ̅ϩⲏⲧ ⲉⲩⲛⲁⲩ‐ <text:line-break/><text:span text:style-name="T1"> </text:span><text:span text:style-name="T2">(52/16) </text:span> ⲉⲛⲓϭⲟⲙ ⲉⲛⲉⲩϫⲏⲕ ⲉⲃⲟⲗ ϩ̅ⲓ̅ <text:line-break/><text:span text:style-name="T1"> </text:span><text:span text:style-name="T2">(52/17) </text:span> ⲧⲟⲟⲧ· ⲁⲩⲱ ϣⲁⲩⲡⲱⲧ ⲛ̅ϭⲓ <text:line-break/><text:span text:style-name="T1"> </text:span><text:span text:style-name="T2">(52/18) </text:span> ⲛⲁⲓ̈ ⲧⲏⲣⲟⲩ ⲉⲛⲧⲁⲩⲉⲓ ⲙ̅ⲛ̅ ⲡⲓ‐ <text:line-break/><text:span text:style-name="T1"> </text:span><text:span text:style-name="T2">(52/19) </text:span> ⲅⲉⲛⲟⲥ ⲉⲡⲉⲥⲏⲧ· ⲉⲃⲟⲗ ϩ̅ⲙ̅ ⲡⲏ‐ <text:line-break/><text:span text:style-name="T1"> </text:span><text:span text:style-name="T2">(52/20) </text:span> ⲉⲛⲧⲁϥⲡⲱⲧ ⲉⲃⲟⲗ ϩ̅ⲙ̅ ⲡⲓⲑⲣⲟ‐ <text:line-break/><text:span text:style-name="T1"> </text:span><text:span text:style-name="T2">(52/21) </text:span> ⲛⲟⲥ ϣⲁ ϯⲥⲟⲫⲓⲁ ⲛ̅ⲧⲉ ϯϩⲉⲗ‐ <text:line-break/><text:span text:style-name="T1"> </text:span><text:span text:style-name="T2">(52/22) </text:span> ⲡⲓⲥ· ⲉⲁⲥⲣ̅ ϣⲟⲣ̅ⲡ̅ ⲛ̅ϯ ⲙⲁⲉⲓⲛ ⲉ‐ <text:line-break/><text:span text:style-name="T1"> </text:span><text:span text:style-name="T2">(52/23) </text:span> ⲧⲃⲏⲏⲧ̅ⲛ̅ ⲙ̅ⲛ̅ ⲛⲏ ⲧⲏⲣⲟⲩ ⲉⲧϣⲟ‐ <text:line-break/><text:span text:style-name="T1"> </text:span><text:span text:style-name="T2">(52/24) </text:span> ⲟⲡ ⲛ̅ⲙ̅ⲙⲁⲉⲓ· ⲛⲓⲉⲃⲟⲗ ϩ̅ⲙ̅ ⲡⲓⲅⲉ‐ <text:line-break/><text:span text:style-name="T1"> </text:span><text:span text:style-name="T2">(52/25) </text:span> ⲛⲟⲥ ⲛ̅ⲧⲉ ⲁⲇⲱⲛⲁⲓⲟⲥ· ϩⲉⲛⲕⲟ‐ <text:line-break/><text:span text:style-name="T1"> </text:span><text:span text:style-name="T2">(52/26) </text:span> ⲟⲩⲉ ⲟⲛ ⲁⲩⲡⲱⲧ ⲛ̅ⲑⲉ ⲉⲃⲟⲗ <text:line-break/><text:span text:style-name="T1"> </text:span><text:span text:style-name="T2">(52/27) </text:span> ϩ̅ⲓ̅ⲧⲟⲟⲧ̅ϥ̅ ⲙ̅ⲡⲓⲕⲟⲥⲙⲟⲕⲣⲁⲧⲱⲣ <text:line-break/><text:span text:style-name="T1"> </text:span><text:span text:style-name="T2">(52/28) </text:span> ⲙ̅ⲛ̅ ⲛⲏ ⲉⲧϣⲟⲟⲡ ⲛ̅ⲙ̅ⲙⲁϥ· <text:line-break/><text:span text:style-name="T1"> </text:span><text:span text:style-name="T2">(52/29) </text:span> ⲉⲁⲩⲉⲓⲛⲉ ⲛ̅ⲕⲟⲗⲁⲥⲓⲥ ⲛⲓⲙ ⲉ‐ <text:line-break/><text:span text:style-name="T1"> </text:span><text:span text:style-name="T2">(52/30) </text:span> ϫⲱⲓ̈· ⲁⲩⲱ ⲛⲉⲩⲛ̅ ⲟⲩⲡⲱⲧ <text:line-break/><text:span text:style-name="T1"> </text:span><text:span text:style-name="T2">(52/31) </text:span> ϣⲟⲟⲡ ⲡⲉ ⲛ̅ⲧⲉ ⲡⲉⲩⲛⲟⲩⲥ <text:line-break/><text:span text:style-name="T1"> </text:span><text:span text:style-name="T2">(52/32) </text:span> ϫⲉ ⲟⲩ ⲡⲉⲧⲟⲩⲛⲁϣⲟϫⲛ͂ <text:line-break/><text:span text:style-name="T1"> </text:span><text:span text:style-name="T2">(52/33) </text:span> ⲉⲣⲟϥ ⲉⲧⲃⲏⲏⲧ· ⲉⲩⲙⲉⲉⲩⲉ <text:line-break/><text:span text:style-name="T1"> </text:span><text:span text:style-name="T2">(52/34) </text:span> ϫⲉ ϯⲙ̅ⲛ̅ⲧⲛⲟϭ ⲧⲏⲣ̅ⲥ̅ ⲧⲉ· ⲁⲩⲱ <text:line-break/><text:span text:style-name="T1"> </text:span><text:span text:style-name="T2">(52/35) </text:span> ⲉⲩϫⲉ ⲙ̅ⲛ̅ⲧ̅ⲙ̅ⲛ̅ⲧⲣⲉ ⲛ̅ⲛⲟⲩϫ <text:line-break/><text:span text:style-name="T1"> </text:span><text:span text:style-name="T2">(52/36) </text:span> ⲉⲡⲓⲕⲉⲣⲱⲙⲉ ⲙ̅ⲛ̅ ϯⲙ̅ⲛ̅ⲧⲛⲟϭ <text:line-break/><text:span text:style-name="T1"> </text:span><text:span text:style-name="T2">(53/1) </text:span> ⲧⲏⲣ̅ⲥ̅ ⲛ̅ⲧⲉ ϯⲉⲕⲕⲗⲏⲥⲓⲁ· ⲛⲉ <text:line-break/><text:span text:style-name="T1"> </text:span><text:span text:style-name="T2">(53/2) </text:span> ⲙ̅ⲙ̅ⲛ̅ϣϭⲟⲙ ⲡⲉ ⲛ̅ⲥⲉⲥⲟⲩⲱ <text:line-break/><text:span text:style-name="T1"> </text:span><text:span text:style-name="T2">(53/3) </text:span> ⲛ̅ⲥ̅ ⲉⲧⲉ ⲡⲓⲱⲧ ⲡⲉ ⲛ̅ⲧⲉ ϯ <text:line-break/><text:span text:style-name="T1"> </text:span><text:span text:style-name="T2">(53/4) </text:span> ⲙ̅ⲛ̅ⲧⲙⲉ· ⲡⲓⲣⲱⲙⲉ ⲛ̅ⲧⲉ ϯ <text:line-break/><text:span text:style-name="T1"> </text:span><text:span text:style-name="T2">(53/5) </text:span> ⲙ̅ⲛ̅ⲧⲛⲟϭ· ⲛⲏ ⲇⲉ ⲛ̅ⲧⲁⲩϫⲓ ⲙ̅‐ <text:line-break/><text:span text:style-name="T1"> </text:span><text:span text:style-name="T2">(53/6) </text:span> ⲡⲓⲣⲁⲛ ⲉⲧⲃⲉ ⲟⲩϫⲱϩ ⲙ̅ⲛ̅ ⲟⲩ‐ <text:line-break/><text:span text:style-name="T1"> </text:span><text:span text:style-name="T2">(53/7) </text:span> ⲙ̅ⲛ̅ⲧ̅ⲁⲧⲥⲟⲟⲩⲛ· ⲉⲧⲉ ⲟⲩⲣⲱ‐ <text:line-break/><text:span text:style-name="T1"> </text:span><text:span text:style-name="T2">(53/8) </text:span> ⲕ̅ϩ̅ ⲙ̅ⲛ̅ ⲟⲩⲥⲕⲉⲩⲟⲥ ⲉⲁⲩⲥⲱ‐ <text:line-break/><text:span text:style-name="T1"> </text:span><text:span text:style-name="T2">(53/9) </text:span> ⲛ̅ⲧ̅ ⲙ̅ⲙⲟϥ ⲉⲩⲧⲉⲕⲟ ⲛ̅ⲧⲉ ⲁⲇⲁⲙ <text:line-break/><text:span text:style-name="T1"> </text:span><text:span text:style-name="T2">(53/10) </text:span> ⲉⲛⲧⲁⲩⲧⲁⲙⲓⲟϥ ϫⲉ ⲉⲩⲛⲁϩⲱ‐ <text:line-break/><text:span text:style-name="T1"> </text:span><text:span text:style-name="T2">(53/11) </text:span> ⲃⲉⲥ ⲉϫ̅ⲛ̅ ⲛⲉⲧⲉ ⲛⲟⲩⲟⲩ ⲛⲉ‐ <text:line-break/><text:soft-page-break/><text:span text:style-name="T1"> </text:span><text:span text:style-name="T2">(53/12) </text:span> ϩ̅ⲛ̅ ⲟⲩϣⲱϣ· ⲁⲗⲗⲁ ⲛ̅ⲧⲟⲟⲩ <text:line-break/><text:span text:style-name="T1"> </text:span><text:span text:style-name="T2">(53/13) </text:span> ⲛⲓⲁⲣⲭⲱⲛ ⲛⲁⲡⲙⲁ ⲛ̅ⲓ̅̈̅ⲁ̅ⲗ̅ⲇ̅ⲁ̅ⲃ̅ⲁ̅ <text:line-break/><text:span text:style-name="T1"> </text:span><text:span text:style-name="T2">(53/14) </text:span> ⲱ̅ⲑ̅· ⲥⲉϭⲱⲗ̅ⲡ̅ ⲙ̅ⲡⲕⲱⲧⲉ ⲛ̅ⲧⲉ <text:line-break/><text:span text:style-name="T1"> </text:span><text:span text:style-name="T2">(53/15) </text:span> ⲛⲓⲁⲅⲅⲉⲗⲟⲥ· ⲡⲏ ⲉⲧⲉ ⲛⲉⲩⲕⲱ‐ <text:line-break/><text:span text:style-name="T1"> </text:span><text:span text:style-name="T2">(53/16) </text:span> ⲧⲉ ⲛ̅ⲥⲱϥ ⲛ̅ϭⲓ ϯⲙ̅ⲛ̅ⲧⲣⲱⲙⲉ <text:line-break/><text:span text:style-name="T1"> </text:span><text:span text:style-name="T2">(53/17) </text:span> ϫⲉ ⲛⲟⲩⲥⲟⲩⲱⲛ ⲡⲣⲱⲙⲉ ⲛ̅ⲧⲙⲉ· <text:line-break/><text:span text:style-name="T1"> </text:span><text:span text:style-name="T2">(53/18) </text:span> ⲁϥⲟⲩⲱⲛ̅ϩ̅ ⲅⲁⲣ ⲉⲣⲟⲟⲩ ⲛ̅ϭⲓ ⲁ̅ⲇⲁⲙ̅ <text:line-break/><text:span text:style-name="T1"> </text:span><text:span text:style-name="T2">(53/19) </text:span> ⲡⲉⲛⲧⲁⲩⲣ̅ⲡⲗⲁⲥⲥⲉ ⲙⲙⲟϥ· <text:line-break/><text:span text:style-name="T1"> </text:span><text:span text:style-name="T2">(53/20) </text:span> ⲟⲩⲕⲓⲙ ⲇⲉ ⲉϥⲉ ⲛ̅ϩ̅ⲣ̅ⲧⲉ ⲁϥϣⲱ‐ <text:line-break/><text:span text:style-name="T1"> </text:span><text:span text:style-name="T2">(53/21) </text:span> ⲡⲉ ϩ̅ⲙ̅ ⲡⲉⲩⲏⲉⲓ ⲧⲏⲣ̅ϥ̅· ⲙⲏⲡⲱⲥ <text:line-break/><text:span text:style-name="T1"> </text:span><text:span text:style-name="T2">(53/22) </text:span> ⲛ̅ⲥⲉⲁϩⲉ ⲛ̅ⲃⲟⲗ ⲛ̅ϭⲓ ⲛⲓⲁⲅⲅⲉⲗⲟⲥ <text:line-break/><text:span text:style-name="T1"> </text:span><text:span text:style-name="T2">(53/23) </text:span> ⲉⲧⲕⲱⲧⲉ ⲉⲣⲟⲟⲩ ⲁϫ̅ⲛ̅ ⲛⲏ ⲅⲁⲣ <text:line-break/><text:span text:style-name="T1"> </text:span><text:span text:style-name="T2">(53/24) </text:span> ⲉⲧⲉ ⲛⲉⲩϯ ⲉⲟⲟⲩ· ⲁⲉⲓⲙⲟⲩ <text:line-break/><text:span text:style-name="T1"> </text:span><text:span text:style-name="T2">(53/25) </text:span> ⲛ̅ϩⲣⲁⲓ̈ ϩ̅ⲛ̅ ⲟⲩⲧⲁϫ〈ⲣ〉ⲟ ⲁⲛ ϫⲉ ⲛⲉϥ‐ <text:line-break/><text:span text:style-name="T1"> </text:span><text:span text:style-name="T2">(53/26) </text:span> ϣⲱⲡⲉ ⲉϥϣⲟⲩⲉⲓⲧ ⲛ̅ϭⲓ ⲡⲉⲩ‐ <text:line-break/><text:span text:style-name="T1"> </text:span><text:span text:style-name="T2">(53/27) </text:span> ⲁⲣ〈ⲭ〉ⲓⲁⲅⲅⲉⲗⲟⲥ· ⲁⲩⲱ ⲧⲟⲧⲉ <text:line-break/><text:span text:style-name="T1"> </text:span><text:span text:style-name="T2">(53/28) </text:span> ⲁⲩⲥⲙⲏ ϣⲱⲡⲉ ⲛ̅ⲧⲉ ⲡⲕⲟⲥ‐ <text:line-break/><text:span text:style-name="T1"> </text:span><text:span text:style-name="T2">(53/29) </text:span> ⲙⲟⲕⲣⲁⲧⲱⲣ ϣⲁ ⲛⲓⲁⲅⲅⲉⲗⲟⲥ <text:line-break/><text:span text:style-name="T1"> </text:span><text:span text:style-name="T2">(53/30) </text:span> ϫⲉ ⲁⲛⲟⲕ ⲡⲉ ⲡⲛⲟⲩⲧⲉ ⲁⲩⲱ <text:line-break/><text:span text:style-name="T1"> </text:span><text:span text:style-name="T2">(53/31) </text:span> ⲙ̅ⲙ̅ⲛ̅ ϭⲉ ⲛ̅ⲥⲁ ⲁⲛⲟⲕ· ⲁⲛⲟⲕ <text:line-break/><text:span text:style-name="T1"> </text:span><text:span text:style-name="T2">(53/32) </text:span> ⲇⲉ ⲁⲉⲓⲥⲱⲃⲉ ϩ̅ⲛ̅ ⲟⲩⲣⲁϣⲉ <text:line-break/><text:span text:style-name="T1"> </text:span><text:span text:style-name="T2">(53/33) </text:span> ⲛ̅ⲧⲉⲣⲓⲙⲟⲩϣ̅ⲧ̅ ⲙ̅ⲡⲉϥⲉⲟⲟⲩ <text:line-break/><text:span text:style-name="T1"> </text:span><text:span text:style-name="T2">(53/34) </text:span> ⲉⲧϣⲟⲩⲉⲓⲧ· ⲛ̅ⲧⲟϥ ⲇⲉ ⲛⲉϥ‐ <text:line-break/><text:span text:style-name="T1"> </text:span><text:span text:style-name="T2">(53/35) </text:span> ϫⲱ ⲙ̅ⲙⲟⲥ ⲛ̅ϩⲟⲩⲟ ϫⲉ ⲛⲓⲙ <text:line-break/><text:span text:style-name="T1"> </text:span><text:span text:style-name="T2">(54/1) </text:span> ⲡⲉ ⲡⲣⲱⲙⲉ· ϯⲥⲧⲣⲁⲧⲓⲁ ⲇⲉ ⲧⲏ‐ <text:line-break/><text:span text:style-name="T1"> </text:span><text:span text:style-name="T2">(54/2) </text:span> ⲣ̅ⲥ̅ ⲛ̅ⲧⲉ ⲛⲉϥⲁⲅⲅⲉⲗⲟⲥ ⲛⲉⲛⲧⲁⲩ‐ <text:line-break/><text:span text:style-name="T1"> </text:span><text:span text:style-name="T2">(54/3) </text:span> ⲛⲁⲩ ⲉⲁⲇⲁⲙ ⲙ̅ⲛ̅ ⲡⲉϥⲏⲉⲓ ⲛⲉⲩⲥⲱ‐ <text:line-break/><text:span text:style-name="T1"> </text:span><text:span text:style-name="T2">(54/4) </text:span> ⲃⲉ ⲛ̅ⲥⲁ ⲧⲉϥⲙ̅ⲛ̅ⲧ̅ⲕⲟⲩⲉⲓ· ⲁⲩⲱ <text:line-break/><text:span text:style-name="T1"> </text:span><text:span text:style-name="T2">(54/5) </text:span> ⲛ̅ϯϩⲉ ⲁⲧⲉⲩⲉⲛⲛⲟⲓⲁ ϣⲱⲡⲉ ⲉⲥ‐ <text:line-break/><text:span text:style-name="T1"> </text:span><text:span text:style-name="T2">(54/6) </text:span> ⲡⲟⲛⲉ ⲉⲃⲟⲗ ⲛ̅ⲥⲁⲃⲟⲗ ⲙ̅ⲡⲓⲙⲉⲅⲉ‐ <text:line-break/><text:span text:style-name="T1"> </text:span><text:span text:style-name="T2">(54/7) </text:span> ⲑⲟⲥ ⲛ̅ⲧⲉ ⲛⲓⲡⲏⲩⲉ ⲉⲧⲉ ⲡⲓⲣⲱ‐ <text:line-break/><text:span text:style-name="T1"> </text:span><text:span text:style-name="T2">(54/8) </text:span> ⲙⲉ ⲡⲉ ⲛ̅ⲧⲉ ϯⲙ̅ⲛ̅ⲧⲙⲉ· ⲡⲉⲛ‐ <text:line-break/><text:span text:style-name="T1"> </text:span><text:span text:style-name="T2">(54/9) </text:span> ⲧⲁⲩⲛⲁⲩ ⲉⲡⲉϥⲣⲁⲛ ϫⲉ ϥϣⲟⲟⲡ <text:line-break/><text:span text:style-name="T1"> </text:span><text:span text:style-name="T2">(54/10) </text:span> ϩ̅ⲛ̅ ⲟⲩⲙ̅ⲛⲧ̅ⲕⲟⲩⲉⲓ ⲛ̅ⲧⲉ ⲟⲩⲙⲁ <text:line-break/><text:span text:style-name="T1"> </text:span><text:span text:style-name="T2">(54/11) </text:span> ⲛ̅ϣⲱⲡⲉ ⲉⲩⲥⲟⲃ̅ⲕ̅ ⲛ̅ⲁⲑⲏⲧ ϩⲣⲁⲓ̈ <text:line-break/><text:span text:style-name="T1"> </text:span><text:span text:style-name="T2">(54/12) </text:span> ϩ̅ⲛ̅ ⲧⲉⲩⲉⲛⲛⲟⲓⲁ ⲉⲧϣⲟⲩⲉⲓⲧ <text:line-break/><text:span text:style-name="T1"> </text:span><text:span text:style-name="T2">(54/13) </text:span> ⲛ̅ϭⲓ ⲡⲉⲩⲥⲱⲃⲉ· ⲛⲉϥϣⲟⲟⲡ ⲛ̅‐ <text:line-break/><text:span text:style-name="T1"> </text:span><text:span text:style-name="T2">(54/14) </text:span> ⲟⲩⲱϭ̅ⲥ̅ ⲛⲁⲩ ⲡⲉ· ϯⲙ̅ⲛⲧ̅ⲛⲟϭ ⲧⲏ‐ <text:line-break/><text:span text:style-name="T1"> </text:span><text:span text:style-name="T2">(54/15) </text:span> ⲣ̅ⲥ̅ ⲛ̅ⲧⲉ ϯⲙ̅ⲛⲧ̅ⲉⲓⲱⲧ ⲛ̅ⲧⲉ ⲡⲓ‐ <text:line-break/><text:span text:style-name="T1"> </text:span><text:span text:style-name="T2">(54/16) </text:span> ⲡ̅ⲛ̅ⲁ̅· ⲛⲉϥⲙⲟⲧ̅ⲛ̅ ⲙ̅ⲙⲟϥ ϩ̅ⲛ̅ ⲛⲓ‐ <text:line-break/><text:span text:style-name="T1"> </text:span><text:span text:style-name="T2">(54/17) </text:span> ⲧⲟⲡⲟⲥ ⲛ̅ⲧⲁϥ· ⲁⲩⲱ ⲁⲛⲟⲕ ⲡⲉ‐ <text:line-break/><text:span text:style-name="T1"> </text:span><text:span text:style-name="T2">(54/18) </text:span> ⲛⲉⲓ̈ϣⲟⲟⲡ ⲛ̅ⲙ̅ⲙⲁϥ ⲡⲉ· ⲉⲩⲛ̅‐ <text:line-break/><text:span text:style-name="T1"> </text:span><text:span text:style-name="T2">(54/19) </text:span> ⲧⲁⲓ̈ ⲛ̅ⲟⲩⲉⲛⲛⲟⲓⲁ ⲛ̅ⲧⲉ ⲟⲩⲁⲡⲟⲣ‐ <text:line-break/><text:span text:style-name="T1"> </text:span><text:span text:style-name="T2">(54/20) </text:span> ⲣⲟⲓⲁ ⲛ̅ⲟⲩⲱⲧ ⲉⲃⲟⲗ ϩ̅ⲛ̅ ⲛⲓϣⲁ ⲉ‐ <text:line-break/><text:span text:style-name="T1"> </text:span><text:span text:style-name="T2">(54/21) </text:span> ⲛⲉϩ· ⲙ̅ⲛ̅ ⲛⲓⲙ̅ⲛⲧ̅ⲁⲧⲥⲟⲩⲱⲛⲟⲩ <text:line-break/><text:span text:style-name="T1"> </text:span><text:span text:style-name="T2">(54/22) </text:span> ⲛ̅ⲁⲧϫⲱϩ̅ⲙ̅· ⲁⲩⲱ ⲛ̅ⲁⲧϯ ϣⲓ ⲉⲣⲟ‐ <text:line-break/><text:span text:style-name="T1"> </text:span><text:span text:style-name="T2">(54/23) </text:span> ⲟⲩ· ⲁⲉⲓⲕⲁⲁⲥ ⲛ̅ϩⲣⲁⲓ̈ ϩ̅ⲙ̅ ⲡⲓⲕⲟⲥ‐ <text:line-break/><text:soft-page-break/><text:span text:style-name="T1"> </text:span><text:span text:style-name="T2">(54/24) </text:span> ⲙⲟⲥ ⲉⲧⲉ ϯⲉⲛⲛⲟⲓⲁ ⲧⲉ ⲉⲧⲥⲟ‐ <text:line-break/><text:span text:style-name="T1"> </text:span><text:span text:style-name="T2">(54/25) </text:span> ⲃ̅ⲕ̅ ⲉⲁⲉⲓϣⲧ̅ⲣ̅ⲧⲱⲣⲟⲩ· ⲁⲩⲱ ⲉⲁⲓ̈ <text:line-break/><text:span text:style-name="T1"> </text:span><text:span text:style-name="T2">(54/26) </text:span> ϯ ϩ̅ⲣ̅ⲧⲉ ⲙ̅ⲡⲁϣⲁⲓ̈ ⲧⲏⲣ̅ϥ̅ ⲛ̅ⲧⲉ ⲛⲓ‐ <text:line-break/><text:span text:style-name="T1"> </text:span><text:span text:style-name="T2">(54/27) </text:span> ⲁⲅⲅⲉⲗⲟⲥ ⲙ̅ⲛ̅ ⲡⲉⲩⲁⲣⲭⲱⲛ· ⲁⲛⲟⲕ <text:line-break/><text:span text:style-name="T1"> </text:span><text:span text:style-name="T2">(54/28) </text:span> ⲇⲉ ⲛⲉⲓ̈ⲙⲟⲩϣ̅ⲧ̅ ⲙ̅ⲙⲟⲟⲩ ⲧⲏ‐ <text:line-break/><text:span text:style-name="T1"> </text:span><text:span text:style-name="T2">(54/29) </text:span> ⲣⲟⲩ ⲡⲉ ϩ̅ⲛ̅ ⲟⲩⲕⲱϩ̅ⲧ̅ ⲙ̅ⲛ̅ ⲟⲩ‐ <text:line-break/><text:span text:style-name="T1"> </text:span><text:span text:style-name="T2">(54/30) </text:span> ⲕⲣⲱⲙ ⲉⲧⲃⲉ ⲧⲁⲉⲛⲛⲟⲓⲁ· ⲁⲩⲱ <text:line-break/><text:span text:style-name="T1"> </text:span><text:span text:style-name="T2">(54/31) </text:span> ϩⲱⲃ ⲛⲓⲙ ⲛ̅ⲧⲟⲟⲧⲟⲩ ⲁⲩⲣ̅ⲉⲛⲉⲣ‐ <text:line-break/><text:span text:style-name="T1"> </text:span><text:span text:style-name="T2">(54/32) </text:span> ⲅⲉⲓ ⲉⲧⲃⲏⲏⲧ ⲟⲩϣⲧⲟⲣⲧ̅ⲣ̅ ⲇⲉ <text:line-break/><text:span text:style-name="T1"> </text:span><text:span text:style-name="T2">(54/33) </text:span> ⲙ̅ⲛ̅ ⲟⲩϯ ⲁϥϣⲱⲡⲉ ⲙ̅ⲡⲕⲱⲧⲉ <text:line-break/><text:span text:style-name="T1"> </text:span><text:span text:style-name="T2">(54/34) </text:span> ⲛ̅ⲛⲓⲥⲁⲣⲁⲫⲓⲛ ⲙ̅ⲛ̅ ⲛⲓⲭⲉⲣⲟⲩⲃⲓⲛ <text:line-break/><text:span text:style-name="T1"> </text:span><text:span text:style-name="T2">(54/35) </text:span> ⲉϥⲛⲁⲃⲱⲗ ⲉⲃⲟⲗ ⲛ̅ϭⲓ ⲡⲟⲩⲉⲟⲟⲩ̣ <text:line-break/><text:span text:style-name="T1"> </text:span><text:span text:style-name="T2">(55/1) </text:span> ⲙ̅ⲛ̅ ⲡⲧⲱϩ ⲉⲧϣⲟⲟⲡ ⲙ̅ⲡⲕⲱ‐ <text:line-break/><text:span text:style-name="T1"> </text:span><text:span text:style-name="T2">(55/2) </text:span> ⲧⲉ ⲛ̅ⲁⲇⲱⲛⲁⲓⲟⲥ ⲙ̅ⲡⲓⲥⲁ ⲙ̅ⲛ̅ <text:line-break/><text:span text:style-name="T1"> </text:span><text:span text:style-name="T2">(55/3) </text:span> ⲡⲁⲓ̈ ⲙ̅ⲛ̅ ⲡⲉⲩⲏⲉⲓ ϣⲁ ⲡⲓⲕⲟⲥⲙⲟ‐ <text:line-break/><text:span text:style-name="T1"> </text:span><text:span text:style-name="T2">(55/4) </text:span> ⲕⲣⲁⲧⲱⲣ ⲙ̅ⲛ̅ ⲡⲏ ⲉⲛⲉϥϫⲱ ⲙ̅‐ <text:line-break/><text:span text:style-name="T1"> </text:span><text:span text:style-name="T2">(55/5) </text:span> ⲙⲟⲥ ϫⲉ ⲙⲁⲣ̅ⲛ̅ϥⲓⲧ̅ϥ̅· ϩⲉⲛⲕⲟ‐ <text:line-break/><text:span text:style-name="T1"> </text:span><text:span text:style-name="T2">(55/6) </text:span> ⲟⲩⲉ ⲟⲛ ϫⲉ ⲛⲉϥϣⲱⲡⲉ ⲛ̅ϭⲓ ⲡⲓ‐ <text:line-break/><text:span text:style-name="T1"> </text:span><text:span text:style-name="T2">(55/7) </text:span> ϣⲟϫⲛⲉ· ⲉϥⲥⲟⲟⲩⲛ ⲅⲁⲣ ⲙ̅ⲙⲟⲓ̈ <text:line-break/><text:span text:style-name="T1"> </text:span><text:span text:style-name="T2">(55/8) </text:span> ⲛ̅ϭⲓ ⲁⲇⲱⲛⲁⲓⲟⲥ ⲉⲧⲃⲉ ⲟⲩϩⲉⲗ‐ <text:line-break/><text:span text:style-name="T1"> </text:span><text:span text:style-name="T2">(55/9) </text:span> ⲡⲓⲥ· ⲁⲛⲟⲕ ⲇⲉ ⲛⲉⲉⲓϣⲟⲟⲡ <text:line-break/><text:span text:style-name="T1"> </text:span><text:span text:style-name="T2">(55/10) </text:span> ϩ̅ⲛ̅ ⲣⲱⲟⲩ ⲛ̅ϩⲉⲛⲙⲟⲩⲉⲓ· ⲁⲩⲱ <text:line-break/><text:span text:style-name="T1"> </text:span><text:span text:style-name="T2">(55/11) </text:span> ⲡⲓϣⲟϫⲛⲉ ⲛ̅ⲧⲁⲩⲥⲟⲟⲩⲛ ⲛ̅ϩⲏ‐ <text:line-break/><text:span text:style-name="T1"> </text:span><text:span text:style-name="T2">(55/12) </text:span> ⲧ̅ϥ̅ ⲉⲧⲃⲏⲏⲧ ⲉⲩⲃⲱⲗ ⲉⲃⲟⲗ ⲛ̅ⲧⲉ‐ <text:line-break/><text:span text:style-name="T1"> </text:span><text:span text:style-name="T2">(55/13) </text:span> ⲧⲉⲩⲡⲗⲁⲛⲏ ⲙ̅ⲛ̅ ⲧⲉⲩⲙⲛ̅ⲧ̅ⲁⲍ̅ⲏⲧ <text:line-break/><text:span text:style-name="T1"> </text:span><text:span text:style-name="T2">(55/14) </text:span> ⲙ̅ⲡⲓϯ ⲉϩⲟⲩⲛ ⲉϫⲱⲟⲩ ⲛ̅ⲑⲉ ⲛ̅‐ <text:line-break/><text:span text:style-name="T1"> </text:span><text:span text:style-name="T2">(55/15) </text:span> ⲧⲁⲩϣⲟϫⲛⲉ· ⲁⲛⲟⲕ ⲇⲉ ⲛⲉⲉⲓ‐ <text:line-break/><text:span text:style-name="T1"> </text:span><text:span text:style-name="T2">(55/16) </text:span> ⲙⲟⲕ̅ϩ̅ ⲛ̅ⲗⲁⲁⲩ ⲁⲛ· ⲁⲩⲣ̅ⲕⲟⲗⲁⲍⲉ <text:line-break/><text:span text:style-name="T1"> </text:span><text:span text:style-name="T2">(55/17) </text:span> ⲙ̅ⲙⲟⲓ̈ ⲛ̅ϭⲓ ⲛⲏ ⲉⲧ̅ⲙ̅ⲙⲁⲩ· ⲁⲩⲱ <text:line-break/><text:span text:style-name="T1"> </text:span><text:span text:style-name="T2">(55/18) </text:span> ⲛⲉⲓ̈ⲙⲟⲩ ⲛ̅ϩⲣⲁⲓ̈ ϩ̅ⲛ̅ ⲟⲩⲧⲁϫⲣⲟ ⲁⲛ· <text:line-break/><text:span text:style-name="T1"> </text:span><text:span text:style-name="T2">(55/19) </text:span> ⲁⲗⲗⲁ ϩ̅ⲙ̅ ⲡⲉⲧⲟⲩⲟⲛ̅ϩ̅· ϫⲉ ⲛⲉⲩ‐ <text:line-break/><text:span text:style-name="T1"> </text:span><text:span text:style-name="T2">(55/20) </text:span> ϯ ϣⲓⲡⲉ ⲛⲁⲓ̈ ⲉⲃⲟⲗ ϩ̅ⲓ̅ⲧⲟⲟⲧⲟⲩ <text:line-break/><text:span text:style-name="T1"> </text:span><text:span text:style-name="T2">(55/21) </text:span> ϫⲉ ⲟⲩⲁ ⲉⲃⲟⲗ ⲙ̅ⲙⲟⲓ̈ ⲛⲉ ⲛⲁⲓ̈· ⲁⲓ̈‐ <text:line-break/><text:span text:style-name="T1"> </text:span><text:span text:style-name="T2">(55/22) </text:span> ϣⲱⲱⲧ ⲉⲃⲟⲗ ⲙ̅ⲙⲟⲉⲓ ⲙ̅ⲡϣⲓⲡⲉ <text:line-break/><text:span text:style-name="T1"> </text:span><text:span text:style-name="T2">(55/23) </text:span> ⲁⲩⲱ ⲙ̅ⲡⲓⲣ̅ ϭⲁⲃϩⲏⲧ ϩⲁⲑⲏ ⲙ̅ⲡⲏ‐ <text:line-break/><text:span text:style-name="T1"> </text:span><text:span text:style-name="T2">(55/24) </text:span> ⲛ̅ⲧⲁϥϣⲱⲡⲉ ⲛⲁⲓ̈ ⲉⲃⲟⲗ ϩ̅ⲓ̅ⲧⲟ‐ <text:line-break/><text:span text:style-name="T1"> </text:span><text:span text:style-name="T2">(55/25) </text:span> ⲟⲧⲟⲩ· ⲛⲉⲓ̈ⲛⲁϣⲱⲡⲉ ⲡⲉ ⲛ̅‐ <text:line-break/><text:span text:style-name="T1"> </text:span><text:span text:style-name="T2">(55/26) </text:span> ϩ̅ⲙ̅ϩⲁⲗ ⲛ̅ⲑⲟⲧⲉ· ⲁⲛⲟⲕ ⲇⲉ ⲁⲉⲓ‐ <text:line-break/><text:span text:style-name="T1"> </text:span><text:span text:style-name="T2">(55/27) </text:span> ϫⲓ ⲙ̅{ⲡⲓ}ⲕⲁϩ ⲕⲁⲧⲁ ⲡⲉⲩⲉⲓⲱⲣ̅ϩ̅ <text:line-break/><text:span text:style-name="T1"> </text:span><text:span text:style-name="T2">(55/28) </text:span> ⲙ̅ⲛ̅ ⲡⲟⲩⲙⲉⲉⲩⲉ· ϣⲓⲛⲁ ϫⲉ <text:line-break/><text:span text:style-name="T1"> </text:span><text:span text:style-name="T2">(55/29) </text:span> ⲛⲟⲩϭ̅ⲛ̅ ⲗⲁⲁⲩ ⲛ̅ϣⲁϫⲉ ⲉϫⲟⲟⲥ <text:line-break/><text:span text:style-name="T1"> </text:span><text:span text:style-name="T2">(55/30) </text:span> ⲉⲧⲃⲏⲏⲧⲟⲩ ⲉⲛⲉϩ· ⲡⲓⲙⲟⲩ <text:line-break/><text:span text:style-name="T1"> </text:span><text:span text:style-name="T2">(55/31) </text:span> ⲅⲁⲣ ⲛ̅ⲧⲟⲟⲧ ⲉⲧⲟⲩⲙⲉⲉⲩⲉ ϫⲉ <text:line-break/><text:span text:style-name="T1"> </text:span><text:span text:style-name="T2">(55/32) </text:span> ⲁϥϣⲱⲡⲉ 〈ⲁϥϣⲱⲡⲉ〉 ⲛⲁⲩ ϩⲣⲁⲓ̈ ϩ̅ⲛ̅ ⲧⲟⲩ <text:line-break/><text:span text:style-name="T1"> </text:span><text:span text:style-name="T2">(55/33) </text:span> ⲡⲗⲁⲛⲏ· ⲁⲩⲱ ⲧⲉⲩⲙ̅ⲛ̅ⲧ̅ⲁⲧ <text:line-break/><text:span text:style-name="T1"> </text:span><text:span text:style-name="T2">(55/34) </text:span> ⲉⲓⲱⲣ̅ϩ̅ ⲉⲁⲩϯ ⲉⲓϥ̅ⲧ̅ ⲙ̅ⲡⲉⲩ‐ <text:line-break/><text:span text:style-name="T1"> </text:span><text:span text:style-name="T2">(55/35) </text:span> ⲣⲱⲙⲉ ⲉϩⲟⲩⲛ ⲉⲡⲉⲩⲙⲟⲩ <text:line-break/><text:soft-page-break/><text:span text:style-name="T1"> </text:span><text:span text:style-name="T2">(55/36) </text:span> ⲛⲉⲩⲉⲛⲛⲟⲓⲁ ⲅⲁⲣ ⲙ̅ⲡⲟⲩⲛⲁⲩ <text:line-break/><text:span text:style-name="T1"> </text:span><text:span text:style-name="T2">(56/1) </text:span> ⲉⲣⲟⲉⲓ· ⲛⲉϩⲉⲛⲕⲟⲩⲣ ⲅⲁⲣ ⲛⲉ· <text:line-break/><text:span text:style-name="T1"> </text:span><text:span text:style-name="T2">(56/2) </text:span> ⲁⲩⲱ ϩⲉⲛⲃ̅ⲗ̅ⲗⲉⲉⲩⲉ ⲛⲉ· ⲛⲁⲓ̈ <text:line-break/><text:span text:style-name="T1"> </text:span><text:span text:style-name="T2">(56/3) </text:span> ⲇⲉ ⲉⲩⲉⲓⲣⲉ ⲙ̅ⲙⲟⲟⲩ ⲉⲩϯ ϩⲁⲡ <text:line-break/><text:span text:style-name="T1"> </text:span><text:span text:style-name="T2">(56/4) </text:span> ⲉⲣⲟⲟⲩ· ⲁⲛⲟⲕ ⲙⲉⲛ ⲁⲩⲛⲁⲩ <text:line-break/><text:span text:style-name="T1"> </text:span><text:span text:style-name="T2">(56/5) </text:span> ⲉⲣⲟⲓ̈ ⲁⲩⲣ̅ⲕⲟⲗⲁⲍⲉ ⲙ̅ⲙⲟⲉⲓ· <text:line-break/><text:span text:style-name="T1"> </text:span><text:span text:style-name="T2">(56/6) </text:span> ⲛⲉⲕⲉⲟⲩⲁ ⲡⲉ ⲡⲉⲩⲉⲓⲱⲧ ⲡⲏ‐ <text:line-break/><text:span text:style-name="T1"> </text:span><text:span text:style-name="T2">(56/7) </text:span> ⲉⲛⲉϥⲥⲱ ⲙ̅ⲡⲥⲓϣⲉ ⲙ̅ⲛ̅ ⲡⲓϩ̅ⲙϫ̅ <text:line-break/><text:span text:style-name="T1"> </text:span><text:span text:style-name="T2">(56/8) </text:span> ⲛⲉ ⲁⲛⲟⲕ ⲁⲛ ⲡⲉ· ⲛⲉⲩϩ̅ⲓ̅ⲟⲩⲉ <text:line-break/><text:span text:style-name="T1"> </text:span><text:span text:style-name="T2">(56/9) </text:span> ⲛ̅ⲥⲱⲓ̈ ⲙ̅ⲡⲓⲕⲁϣ· ⲛⲉⲕⲉⲟⲩⲁ <text:line-break/><text:span text:style-name="T1"> </text:span><text:span text:style-name="T2">(56/10) </text:span> ⲡⲉⲧⲧⲱⲱⲛ ϩⲁ ⲡⲓⲥ̅xⲟⲥ ϩ̅ⲛ̅ <text:line-break/><text:span text:style-name="T1"> </text:span><text:span text:style-name="T2">(56/11) </text:span> ⲧⲉϥⲛⲁϩ̅ⲃ̅ ⲉⲧⲉ ⲥⲓⲙⲱⲛ ⲡⲉ· <text:line-break/><text:span text:style-name="T1"> </text:span><text:span text:style-name="T2">(56/12) </text:span> ⲛⲉⲕⲉⲟⲩⲁ ⲡⲉⲛⲧⲁⲩϯ ⲙ̅ⲡⲓ‐ <text:line-break/><text:span text:style-name="T1"> </text:span><text:span text:style-name="T2">(56/13) </text:span> ⲕⲗⲟⲙ ⲉϫⲱϥ ⲛ̅ϣⲟⲛⲧⲉ· ⲁⲛⲟ%1 <text:line-break/><text:span text:style-name="T1"> </text:span><text:span text:style-name="T2">(56/14) </text:span> ⲇⲉ ⲛⲉⲓ̈ⲧⲉⲗⲏⲗ ⲙ̅ⲙⲟⲓ̈ ϩ̅ⲙ̅ ⲡϫⲓ‐ <text:line-break/><text:span text:style-name="T1"> </text:span><text:span text:style-name="T2">(56/15) </text:span> ⲥⲉ ⲉϫ̅ⲛ̅ ϯⲙ̅ⲛ̅ⲧ̅ⲣⲙ̅ⲙⲁⲟ ⲧⲏⲣ̅ⲥ̅ <text:line-break/><text:span text:style-name="T1"> </text:span><text:span text:style-name="T2">(56/16) </text:span> ⲛ̅ⲧⲉ ⲛⲓⲁⲣⲭⲱⲛ· ⲙ̅ⲛ̅ ϯⲥⲡⲟⲣⲁ <text:line-break/><text:span text:style-name="T1"> </text:span><text:span text:style-name="T2">(56/17) </text:span> ⲛ̅ⲧⲉ ⲧⲉⲩⲡⲗⲁⲛⲏ ⲛ̅ⲧⲉ ⲡⲉⲩⲉ‐ <text:line-break/><text:span text:style-name="T1"> </text:span><text:span text:style-name="T2">(56/18) </text:span> ⲟⲟⲩ ⲉⲧϣⲟⲩⲉⲓⲧ· ⲁⲩⲱ ⲛⲉⲓ̈‐ <text:line-break/><text:span text:style-name="T1"> </text:span><text:span text:style-name="T2">(56/19) </text:span> ⲥⲱⲃⲉ ⲛ̅ⲥⲁ ⲧⲉⲩⲙ̅ⲛ̅ⲧ̅ⲁⲧⲥⲟ‐ <text:line-break/><text:span text:style-name="T1"> </text:span><text:span text:style-name="T2">(56/20) </text:span> ⲟⲩⲛ· ⲛⲉⲩϭⲟⲙ ⲇⲉ ⲧⲏⲣⲟⲩ ⲁⲓ̈‐ <text:line-break/><text:span text:style-name="T1"> </text:span><text:span text:style-name="T2">(56/21) </text:span> ⲁⲁⲩ ⲛ̅ϩ̅ⲙ̅ϩⲁⲗ· ⲉⲓ̈ⲛ̅ⲛⲏⲩ ⲅⲁⲣ ⲉ‐ <text:line-break/><text:span text:style-name="T1"> </text:span><text:span text:style-name="T2">(56/22) </text:span> ⲡⲉⲥⲏⲧ ⲙ̅ⲡⲉⲗⲁⲁⲩ ⲛⲁⲩ ⲉⲣⲟⲓ̈ <text:line-break/><text:span text:style-name="T1"> </text:span><text:span text:style-name="T2">(56/23) </text:span> ⲛⲉⲉⲓϣⲓⲃⲉ ⲅⲁⲣ ⲛ̅ⲛⲓⲙⲟⲣⲫⲏ ⲛ̅‐ <text:line-break/><text:span text:style-name="T1"> </text:span><text:span text:style-name="T2">(56/24) </text:span> ϩⲣⲁⲓ̈ ⲛ̅ϩⲏⲧ· ⲉⲉⲓⲟⲩⲱⲧ̅ⲃ̅ ⲉⲃⲟⲗ <text:line-break/><text:span text:style-name="T1"> </text:span><text:span text:style-name="T2">(56/25) </text:span> ⲛ̅ⲟⲩⲉⲓⲇⲉⲁ ⲉⲩⲉⲓⲇⲉⲁ· ⲁⲩⲱ ⲉ‐ <text:line-break/><text:span text:style-name="T1"> </text:span><text:span text:style-name="T2">(56/26) </text:span> ⲧⲃⲉ ⲡⲁⲓ̈ ⲉⲓ̈ϣⲟⲟⲡ ϩ̅ⲛ̅ ⲛⲉⲩⲡⲩ‐ <text:line-break/><text:span text:style-name="T1"> </text:span><text:span text:style-name="T2">(56/27) </text:span> ⲗⲏ· ⲛⲉⲓ̈ϫⲓ ⲉⲓⲛⲉ ⲙ̅ⲙⲟⲟⲩ ⲡⲉ· <text:line-break/><text:span text:style-name="T1"> </text:span><text:span text:style-name="T2">(56/28) </text:span> ⲁⲉⲓⲡⲁⲣⲁⲅⲉ ⲅⲁⲣ ⲙ̅ⲙⲟⲟⲩ ϩ̅ⲛ̅ <text:line-break/><text:span text:style-name="T1"> </text:span><text:span text:style-name="T2">(56/29) </text:span> ⲟⲩϩⲣⲟⲕ· ⲁⲩⲱ ⲛⲉⲓ̈ⲛⲁⲩ ⲉⲛⲓ‐ <text:line-break/><text:span text:style-name="T1"> </text:span><text:span text:style-name="T2">(56/30) </text:span> ⲧⲟⲡⲟⲥ ⲁⲩⲱ ⲙ̅ⲡⲓⲣ̅ϩⲟⲧⲉ· <text:line-break/><text:span text:style-name="T1"> </text:span><text:span text:style-name="T2">(56/31) </text:span> ⲁⲩⲱ ⲙ̅ⲡⲓϣⲓⲡⲉ· ⲛⲉⲓ̈ϣⲟⲟⲡ <text:line-break/><text:span text:style-name="T1"> </text:span><text:span text:style-name="T2">(56/32) </text:span> ⲅⲁⲣ ⲛ̅ⲛⲁⲧⲥⲱⲱϥ· ⲁⲩⲱ ⲛⲉⲓ̈‐ <text:line-break/><text:span text:style-name="T1"> </text:span><text:span text:style-name="T2">(56/33) </text:span> ϣⲁϫⲉ ⲛ̅ⲙ̅ⲙⲁⲩ· ⲉⲓ̈ⲙⲟϫ̅ϭ̅ ⲛ̅ⲙ̅‐ <text:line-break/><text:span text:style-name="T1"> </text:span><text:span text:style-name="T2">(56/34) </text:span> ⲙⲁⲩ ⲉⲃⲟⲗ ϩ̅ⲓⲧ̅ⲛ̅ ⲛⲉⲧⲉⲛⲟⲩ‐ <text:line-break/><text:span text:style-name="T1"> </text:span><text:span text:style-name="T2">(56/35) </text:span> ⲉⲓ· ⲁⲩⲱ ⲉⲉⲓϩⲱⲙ ⲉϫ̅ⲛ̅ ⲛⲉⲧ‐ <text:line-break/><text:span text:style-name="T1"> </text:span><text:span text:style-name="T2">(57/1) </text:span> ⲛⲁϣ̅ⲧ̅ ⲛ̅ⲧⲟⲟⲧⲟⲩ· ⲙ̅ⲛ̅ ⲡⲓⲕⲱϩ· <text:line-break/><text:span text:style-name="T1"> </text:span><text:span text:style-name="T2">(57/2) </text:span> ⲁⲩⲱ ⲡⲓⲕⲣⲱⲙ ⲉⲓ̈ϫⲛⲉ ⲙ̅ⲙⲟϥ <text:line-break/><text:span text:style-name="T1"> </text:span><text:span text:style-name="T2">(57/3) </text:span> ⲉⲃⲟⲗ· ⲛⲁⲓ̈ ⲇⲉ ⲧⲏⲣⲟⲩ ⲛⲉⲓ̈ⲉⲓⲣⲉ <text:line-break/><text:span text:style-name="T1"> </text:span><text:span text:style-name="T2">(57/4) </text:span> ⲙ̅ⲙⲟⲟⲩ ⲡⲉ ⲉⲧⲃⲉ ⲡⲁⲟⲩⲱϣ <text:line-break/><text:span text:style-name="T1"> </text:span><text:span text:style-name="T2">(57/5) </text:span> ϫⲉⲕⲁⲁⲥ ⲡⲏ ⲉⲧⲉ ⲛⲉⲓ̈ⲟⲩⲁϣ̅ϥ̅ <text:line-break/><text:span text:style-name="T1"> </text:span><text:span text:style-name="T2">(57/6) </text:span> ϩ̅ⲙ̅ ⲡⲟⲩⲱϣ ⲙ̅ⲡⲓⲱⲧ ⲉⲧ̅ⲙ̅ⲡⲥⲁⲛ <text:line-break/><text:span text:style-name="T1"> </text:span><text:span text:style-name="T2">(57/7) </text:span> ϩⲣⲉ ⲛ̅ⲧⲁϫⲟⲕ̅ϥ̅ ⲉⲃⲟⲗ· ⲁⲩⲱ ⲡϣⲏ‐ <text:line-break/><text:span text:style-name="T1"> </text:span><text:span text:style-name="T2">(57/8) </text:span> ⲣⲉ ⲛ̅ⲧⲉ ⲡⲓⲙⲉⲅⲉⲑⲟⲥ ⲉⲛⲉϥϩⲏⲡ <text:line-break/><text:span text:style-name="T1"> </text:span><text:span text:style-name="T2">(57/9) </text:span> ϩ̅ⲙ̅ ⲡⲓⲙⲉⲣⲟⲥ ⲉⲧⲥⲁⲡⲉⲥⲏⲧ <text:line-break/><text:span text:style-name="T1"> </text:span><text:span text:style-name="T2">(57/10) </text:span> ⲛ̅ⲧⲁⲛⲛ̅ⲧ̅ϥ̅ ⲉⲡϫⲓⲥⲉ· ⲉⲧⲉ 〈ⲛ〉ⲉⲉⲓ‐ <text:line-break/><text:span text:style-name="T1"> </text:span><text:span text:style-name="T2">(57/11) </text:span> ϣⲟⲟⲡ ⲛ̅ⲛⲉⲓ̈ⲁⲓⲱⲛ ⲧⲏⲣⲟⲩ ⲛ̅ⲙ̅‐ <text:line-break/><text:soft-page-break/><text:span text:style-name="T1"> </text:span><text:span text:style-name="T2">(57/12) </text:span> ⲙⲁⲩ ⲉⲧⲉ ⲙ̅ⲡⲉⲗⲁⲁⲩ ⲛⲁⲩ ⲉⲣⲟϥ <text:line-break/><text:span text:style-name="T1"> </text:span><text:span text:style-name="T2">(57/13) </text:span> ⲟⲩⲧⲉ ⲙ̅ⲡⲟⲩⲉⲓⲙⲉ ⲉⲣⲟϥ· ⲉⲧⲉ†‐ <text:line-break/><text:span text:style-name="T1"> </text:span><text:span text:style-name="T2">(57/14) </text:span> ⲡⲓϫⲓ ϣⲉⲗⲉⲉⲧ ⲡⲉ ⲛ̅ⲧⲉ ϯⲥⲧⲟ‐ <text:line-break/><text:span text:style-name="T1"> </text:span><text:span text:style-name="T2">(57/15) </text:span> ⲗⲏ ⲛ̅ϫⲓ ϣⲉⲗⲉⲉⲧ· ⲡⲓⲃ̅ⲣ̅ⲣⲉ· ⲁⲩⲱ <text:line-break/><text:span text:style-name="T1"> </text:span><text:span text:style-name="T2">(57/16) </text:span> ⲡⲓⲁⲥ ⲁⲛ· ⲟⲩⲧⲉ ⲙⲁϥⲧⲁⲕⲟ· ⲟⲩ‐ <text:line-break/><text:span text:style-name="T1"> </text:span><text:span text:style-name="T2">(57/17) </text:span> ⲡⲁⲥⲧⲟⲥ ⲅⲁⲣ ⲃ̅ⲃ̅ⲣ̅ⲣⲉ ⲡⲉ ⲛ̅ⲧⲉ ⲛⲓ‐ <text:line-break/><text:span text:style-name="T1"> </text:span><text:span text:style-name="T2">(57/18) </text:span> ⲡⲏⲩⲉ· ⲁⲩⲱ ⲛ̅ⲧⲉⲗⲓⲟⲥ· ⲉⲁⲉⲓ‐ <text:line-break/><text:span text:style-name="T1"> </text:span><text:span text:style-name="T2">(57/19) </text:span> ⲟⲩⲱⲛ̅ϩ̅ ⲉⲃⲟⲗ ⲉⲣⲟϥ· ⲉⲩⲟ ⲛ̅‐ <text:line-break/><text:span text:style-name="T1"> </text:span><text:span text:style-name="T2">(57/20) </text:span> ϣⲟⲙⲉⲧ ⲙ̅ⲙⲟⲉⲓⲧ· ⲟⲩⲙⲩⲥ‐ <text:line-break/><text:span text:style-name="T1"> </text:span><text:span text:style-name="T2">(57/21) </text:span> ⲧⲏⲣⲓⲟⲛ ⲛ̅ⲁⲧϫⲱϩ̅ⲙ̅ ϩ̅ⲛ̅ ⲟⲩ‐ <text:line-break/><text:span text:style-name="T1"> </text:span><text:span text:style-name="T2">(57/22) </text:span> ⲡ̅ⲛ̅ⲁ̅ ⲛ̅ⲧⲉ ⲡⲉⲓ̈ⲁⲓⲱⲛ ⲉⲧⲉ ⲙⲁϥ‐ <text:line-break/><text:span text:style-name="T1"> </text:span><text:span text:style-name="T2">(57/23) </text:span> ⲱϫ̅ⲛ̅· ⲟⲩⲧⲉ ⲛ̅ⲟⲩⲙⲉⲣⲓⲕⲟⲥ <text:line-break/><text:span text:style-name="T1"> </text:span><text:span text:style-name="T2">(57/24) </text:span> ⲁⲛ ⲡⲉ· ⲟⲩⲧⲉ ⲙ̅ⲡⲉϣⲁⲩϣⲁ <text:line-break/><text:span text:style-name="T1"> </text:span><text:span text:style-name="T2">(57/25) </text:span> ϫⲉ ⲉⲧⲃⲏⲏⲧ̅ϥ̅ ⲁⲛ ⲡⲉ· ⲁⲗⲗⲁ ⲉⲩ‐ <text:line-break/><text:span text:style-name="T1"> </text:span><text:span text:style-name="T2">(57/26) </text:span> ⲁⲧⲡⲱϣⲉ ⲡⲉ ⲛ̅ⲕⲁⲑⲟⲗⲓⲕⲟⲛ <text:line-break/><text:span text:style-name="T1"> </text:span><text:span text:style-name="T2">(57/27) </text:span> ⲁⲩⲱ ⲉϥⲙⲏⲛ· ⲧⲯⲩⲭⲏ ⲅⲁⲣ ϯ <text:line-break/><text:span text:style-name="T1"> </text:span><text:span text:style-name="T2">(57/28) </text:span> ⲉⲃⲟⲗ ϩ̅ⲙ̅ ⲡϫⲓⲥⲉ· ⲥⲛⲁϣⲁϫⲉ ⲁⲛ <text:line-break/><text:span text:style-name="T1"> </text:span><text:span text:style-name="T2">(57/29) </text:span> ϩⲁ ϯⲡⲗⲁⲛⲏ ⲉⲧ̅ⲙ̅ⲡⲓⲙⲁ· ⲟⲩⲧⲉ <text:line-break/><text:span text:style-name="T1"> </text:span><text:span text:style-name="T2">(57/30) </text:span> ⲟⲩⲱⲧ̅ⲃ̅ ⲉⲃⲟⲗ· ⲉⲃⲟⲗ ϩ̅ⲛ̅ ⲛⲉⲓ̈ⲁⲓ‐ <text:line-break/><text:span text:style-name="T1"> </text:span><text:span text:style-name="T2">(57/31) </text:span> ⲱⲛ· ⲉⲩⲛⲁⲟⲩⲱⲧ̅ⲃ̅ ⲙ̅ⲙⲟⲥ <text:line-break/><text:span text:style-name="T1"> </text:span><text:span text:style-name="T2">(57/32) </text:span> ⲉⲃⲟⲗ ⲉⲥϣⲁⲛⲣ̅ⲣ̅ⲙ̅ϩⲉ· ⲁⲩⲱ ⲛ̅ⲥ̅ <text:line-break/><text:span text:style-name="T1"> </text:span><text:span text:style-name="T2">(57/33) </text:span> ⲣ̅ⲭⲣⲁⲥⲑⲁⲓ ⲛ̅ⲟⲩⲙⲛ̅ⲧ̅ⲉⲩⲅⲉ <text:line-break/><text:span text:style-name="T1"> </text:span><text:span text:style-name="T2">(57/34) </text:span> ⲛⲏⲥ ϩ̅ⲙ̅ ⲡⲓⲕⲟⲥⲙⲟⲥ ⲉⲥⲁϩⲉ <text:line-break/><text:span text:style-name="T1"> </text:span><text:span text:style-name="T2">(58/1) </text:span> ⲣⲁⲧ̅ⲥ̅ ⲛ̅ⲛⲁϩⲣ̅ⲛ̅ ⲡⲓⲱⲧ ⲁϫ̅ⲛ̅ ϩ̅ⲓ̅ⲥⲉ <text:line-break/><text:span text:style-name="T1"> </text:span><text:span text:style-name="T2">(58/2) </text:span> ⲁⲩⲱ ⲥⲁϯ ⲉⲥⲙⲟϫ̅ϭ̅ ⲛ̅ⲟⲩⲟⲉⲓϣ <text:line-break/><text:span text:style-name="T1"> </text:span><text:span text:style-name="T2">(58/3) </text:span> ⲛⲓⲙ ⲙ̅ⲛ̅ ⲡⲓⲛⲟⲩⲥ ⲛ̅ⲟⲩϭⲁⲙ ⲛ̅‐ <text:line-break/><text:span text:style-name="T1"> </text:span><text:span text:style-name="T2">(58/4) </text:span> ⲧⲉ ⲟⲩⲉⲓⲇⲉⲁ· ⲥⲉⲛⲁⲛⲁⲩ ⲉⲣⲟⲉⲓ <text:line-break/><text:span text:style-name="T1"> </text:span><text:span text:style-name="T2">(58/5) </text:span> ⲛ̅ⲥⲁ ⲥⲁ ⲛⲓⲙ ⲉϫ̅ⲙ̅ ⲙⲟⲥⲧⲉ· ⲉⲩ‐ <text:line-break/><text:span text:style-name="T1"> </text:span><text:span text:style-name="T2">(58/6) </text:span> ⲛⲁⲩ ⲅⲁⲣ ⲉⲣⲟⲓ̈ ⲉⲩⲛⲁⲩ ⲉⲣⲟⲟⲩ <text:line-break/><text:span text:style-name="T1"> </text:span><text:span text:style-name="T2">(58/7) </text:span> ⲉⲩⲙⲟϫ̅ϭ̅ ⲛ̅ⲙ̅ⲙⲁⲩ· ⲁⲛⲟⲕ ⲉⲙ‐ <text:line-break/><text:span text:style-name="T1"> </text:span><text:span text:style-name="T2">(58/8) </text:span> ⲡⲟⲩϯ ϣⲓⲡⲉ ⲛⲁⲓ̈ ⲉⲙⲡⲟⲩϯ ϣⲓ‐ <text:line-break/><text:span text:style-name="T1"> </text:span><text:span text:style-name="T2">(58/9) </text:span> ⲡⲉ ⲛⲁⲩ· ⲁⲛⲟⲕ ⲉⲙⲡⲟⲩⲣ̅ϩⲟ <text:line-break/><text:span text:style-name="T1"> </text:span><text:span text:style-name="T2">(58/10) </text:span> ⲧⲉ ϩⲁⲧⲁϩⲏ ⲉⲩⲛⲁⲡⲁⲣⲁⲅⲉ ⲙ̅ⲡⲩ‐ <text:line-break/><text:span text:style-name="T1"> </text:span><text:span text:style-name="T2">(58/11) </text:span> ⲗⲏ ⲛⲓⲙ ⲉϫ̅ⲛ̅ ϩⲟⲧⲉ· ⲁⲩⲱ ⲉⲩ‐ <text:line-break/><text:span text:style-name="T1"> </text:span><text:span text:style-name="T2">(58/12) </text:span> ⲛⲁϫⲱⲕ ϩ̅ⲙ̅ ⲡⲓⲙⲉϩϣⲟⲙ̅ⲧ̅ ⲛ̅‐ <text:line-break/><text:span text:style-name="T1"> </text:span><text:span text:style-name="T2">(58/13) </text:span> ⲉⲟⲟⲩ· ⲁⲛⲟⲕ ⲉⲧⲉ ⲙ̅ⲡⲉⲡⲓⲕⲟⲥ‐ <text:line-break/><text:span text:style-name="T1"> </text:span><text:span text:style-name="T2">(58/14) </text:span> ⲙⲟⲥ ϣⲱⲡ ⲉⲣⲟϥ ⲙ̅ⲡⲁϣⲉ ⲉ‐ <text:line-break/><text:span text:style-name="T1"> </text:span><text:span text:style-name="T2">(58/15) </text:span> ⲡϫⲓⲥⲉ ⲉⲧⲟⲩⲟⲛ̅ϩ̅· ⲡⲁⲙⲉϩ <text:line-break/><text:span text:style-name="T1"> </text:span><text:span text:style-name="T2">(58/16) </text:span> ϣⲟⲙ̅ⲧ̅ ⲛ̅ϫⲱⲕ̅ⲙ̅ ϩ̅ⲛ̅ ⲟⲩϩ̅ⲓ̅ⲕⲱⲛ <text:line-break/><text:span text:style-name="T1"> </text:span><text:span text:style-name="T2">(58/17) </text:span> ⲉⲥⲟⲩⲟⲛ̅ϩ̅· ⲉⲁⲩⲡⲱⲧ ⲛ̅ⲥⲁⲃⲟⲗ <text:line-break/><text:span text:style-name="T1"> </text:span><text:span text:style-name="T2">(58/18) </text:span> ⲙ̅ⲙⲟϥ ⲛ̅ϭⲓ ⲡⲓⲕⲣⲱⲙ ⲛ̅ⲧⲉ ϯ <text:line-break/><text:span text:style-name="T1"> </text:span><text:span text:style-name="T2">(58/19) </text:span> ⲥⲁϣϥⲉ ⲛ̅ⲛⲉⲝⲟⲩⲥⲓⲁ· ⲁⲩⲱ <text:line-break/><text:span text:style-name="T1"> </text:span><text:span text:style-name="T2">(58/20) </text:span> ⲁϥϩⲱⲧ̅ⲡ̅ ⲛ̅ϭⲓ ⲡⲣⲏ ⲛ̅ⲛⲓϭⲁⲙ ⲛ̅‐ <text:line-break/><text:span text:style-name="T1"> </text:span><text:span text:style-name="T2">(58/21) </text:span> ⲧⲉ ⲛⲓⲁⲣⲭⲱⲛ ⲁⲩⲕⲁⲕⲉ ϫⲓⲧⲟⲩ· <text:line-break/><text:span text:style-name="T1"> </text:span><text:span text:style-name="T2">(58/22) </text:span> ⲁⲩⲱ ⲁϥⲣ̅ϩⲏⲕⲉ ⲛ̅ϭⲓ ⲡⲕⲟⲥⲙⲟⲥ <text:line-break/><text:span text:style-name="T1"> </text:span><text:span text:style-name="T2">(58/23) </text:span> ⲉⲩϩⲟϫϩⲉϫ ⲙ̅ⲙⲟϥ ϩ̅ⲛ̅ ⲟⲩⲙⲏ <text:line-break/><text:span text:style-name="T1"> </text:span><text:span text:style-name="T2">(58/24) </text:span> ⲏϣⲉ ⲛ̅ⲥⲛⲁϩ· ⲁⲩⲱϥ̅ⲧ̅ ⲙ̅ⲙⲟϥ <text:line-break/><text:soft-page-break/><text:span text:style-name="T1"> </text:span><text:span text:style-name="T2">(58/25) </text:span> ⲉⲡⲓϣⲉ· ⲁⲩⲱ ⲁⲩⲧⲁϫⲣⲟϥ ϩ̅ⲛ̅ <text:line-break/><text:span text:style-name="T1"> </text:span><text:span text:style-name="T2">(58/26) </text:span> ϥⲧⲟⲟⲩ ⲛ̅ⲉⲓϥ̅ⲧ̅ ⲛ̅ϩⲙⲟⲧ· ⲡⲓⲕⲁ‐ <text:line-break/><text:span text:style-name="T1"> </text:span><text:span text:style-name="T2">(58/27) </text:span> ⲧⲁⲡⲉⲧⲉⲥⲙⲁ ⲛ̅ⲧⲉ ⲡⲉϥⲣ̅ⲡⲉ <text:line-break/><text:span text:style-name="T1"> </text:span><text:span text:style-name="T2">(58/28) </text:span> ⲁϥⲡⲱϩ ⲙ̅ⲙⲟϥ ⲛ̅ⲛⲉϥϭⲓϫ· ⲟⲩ‐ <text:line-break/><text:span text:style-name="T1"> </text:span><text:span text:style-name="T2">(58/29) </text:span> ⲥⲧⲱⲧ ⲡⲉⲛⲧⲁϥⲁⲙⲁϩⲧⲉ ⲙ̅‐ <text:line-break/><text:span text:style-name="T1"> </text:span><text:span text:style-name="T2">(58/30) </text:span> ⲡⲓⲭⲁⲟⲥ ⲛ̅ⲧⲉ ⲡⲕⲁϩ· ⲁⲩⲃⲱⲗ <text:line-break/><text:span text:style-name="T1"> </text:span><text:span text:style-name="T2">(58/31) </text:span> ⲅⲁⲣ ⲉⲃⲟⲗ ⲛ̅ⲛⲓⲯⲩⲭⲏ ⲉⲧϣⲟ‐ <text:line-break/><text:span text:style-name="T1"> </text:span><text:span text:style-name="T2">(58/32) </text:span> ⲟⲡ ϩ̅ⲛ̅ ⲧ̅ⲃ̅ϣⲉ ⲉⲧⲥⲁⲡⲉⲥⲏⲧ· <text:line-break/><text:span text:style-name="T1"> </text:span><text:span text:style-name="T2">(58/33) </text:span> ⲁⲩⲱ ⲁⲩⲧⲱⲱⲛ ⲁⲩⲙⲟⲟϣⲉ <text:line-break/><text:span text:style-name="T1"> </text:span><text:span text:style-name="T2">(58/34) </text:span> ϩ̅ⲛ̅ ⲟⲩⲡⲁⲣϩⲏⲥⲓⲁ· ⲉⲁⲩⲕⲱ ⲉ‐ <text:line-break/><text:span text:style-name="T1"> </text:span><text:span text:style-name="T2">(59/1) </text:span> ϩⲣⲁⲓ̈ ⲛ̅ⲟⲩⲕⲱϩ ⲙⲙ̅ⲛ̅ⲧ̅ⲁⲧⲥⲟ‐ <text:line-break/><text:span text:style-name="T1"> </text:span><text:span text:style-name="T2">(59/2) </text:span> ⲟⲩⲛ· ⲁⲩⲱ ⲟⲩⲙ̅ⲛ̅ⲧ̅ⲁⲧⲥⲃⲱ <text:line-break/><text:span text:style-name="T1"> </text:span><text:span text:style-name="T2">(59/3) </text:span> ⲛ̅ⲧ̅ⲛ̅ ⲙ̅ϩⲁⲟⲩ ⲉⲧⲙⲟⲟⲩⲧ· ⲉ‐ <text:line-break/><text:span text:style-name="T1"> </text:span><text:span text:style-name="T2">(59/4) </text:span> ⲁⲩϯ ϩ̅ⲓ̅ⲱⲟⲩ ⲙ̅ⲡⲓⲣⲱⲙⲉ ⲛ̅ⲃ̅ⲣ̅‐ <text:line-break/><text:span text:style-name="T1"> </text:span><text:span text:style-name="T2">(59/5) </text:span> ⲣⲉ ⲉⲁⲩⲥⲟⲩⲱⲛ ⲡⲓⲙⲁⲕⲁⲣⲓⲟⲥ <text:line-break/><text:span text:style-name="T1"> </text:span><text:span text:style-name="T2">(59/6) </text:span> ⲉⲧ̅ⲙ̅ⲙⲁⲩ· ⲁⲩⲱ ⲉⲧϫⲏⲕ ⲛ̅ⲧⲉ <text:line-break/><text:span text:style-name="T1"> </text:span><text:span text:style-name="T2">(59/7) </text:span> ⲡⲓⲱⲧ ⲛ̅ϣⲁ ⲉⲛⲉϩ ⲁⲩⲱ ⲛ̅ⲁⲧ‐ <text:line-break/><text:span text:style-name="T1"> </text:span><text:span text:style-name="T2">(59/8) </text:span> ⲧⲁϩⲟϥ ⲙ̅ⲛ̅ ⲡⲓⲟⲩⲟⲉⲓⲛ ⲛ̅ⲁⲧⲁⲣⲏ‐ <text:line-break/><text:span text:style-name="T1"> </text:span><text:span text:style-name="T2">(59/9) </text:span> ϫ̅ϥ̅ ⲉⲧⲉ ⲁⲛⲟⲕ ⲡⲉ· ⲉⲁⲓ̈ⲉ̅ⲓ̅ ϣⲁ <text:line-break/><text:span text:style-name="T1"> </text:span><text:span text:style-name="T2">(59/10) </text:span> ⲛⲉⲧⲉ ⲛⲟⲩⲉⲓ ⲛⲉ ⲁⲩⲱ ⲉⲁⲓ̈ϩⲱ <text:line-break/><text:span text:style-name="T1"> </text:span><text:span text:style-name="T2">(59/11) </text:span> ⲧ̅ⲡ̅ ⲛ̅ⲙ̅ⲙⲁⲩ ⲛ̅ⲙ̅ⲙⲁⲓ̈· ⲉⲥ̅ⲣ̅ⲭⲣⲓⲁ <text:line-break/><text:span text:style-name="T1"> </text:span><text:span text:style-name="T2">(59/12) </text:span> ⲛ̅ϩⲁϩ ⲛ̅ϣⲁϫⲉ ⲁⲛ· ⲛⲉⲣⲉⲧⲉⲛ <text:line-break/><text:span text:style-name="T1"> </text:span><text:span text:style-name="T2">(59/13) </text:span> ⲉⲛⲛⲟⲓⲁ ⲅⲁⲣ ϣⲟⲟⲡ ⲙ̅ⲛ̅ ⲧⲉⲩⲉⲛ‐ <text:line-break/><text:span text:style-name="T1"> </text:span><text:span text:style-name="T2">(59/14) </text:span> ⲛⲟⲓⲁ· ⲉⲧⲃⲉ ⲡⲁⲓ̈ ⲁⲩⲙ̅ⲙⲉ ⲉⲡⲏ ⲉ‐ <text:line-break/><text:span text:style-name="T1"> </text:span><text:span text:style-name="T2">(59/15) </text:span> ⲧⲉ ϣⲁⲉⲓϫⲟⲟϥ· ϫⲉ ⲁⲛϣⲟϫⲛⲉ <text:line-break/><text:span text:style-name="T1"> </text:span><text:span text:style-name="T2">(59/16) </text:span> ⲅⲁⲣ ⲉⲧⲃⲉ ⲡⲃⲱⲗ ⲉⲃⲟⲗ ⲛ̅ⲧⲉ ⲛⲓ‐ <text:line-break/><text:span text:style-name="T1"> </text:span><text:span text:style-name="T2">(59/17) </text:span> ⲁⲣⲭⲱⲛ· ⲁⲩⲱ ⲉⲧⲃⲉ ⲡⲁⲓ̈ ⲁⲓ̈ⲉⲓⲣⲉ <text:line-break/><text:span text:style-name="T1"> </text:span><text:span text:style-name="T2">(59/18) </text:span> ⲙ̅ⲡⲟⲩⲱϣ ⲙ̅ⲡⲓⲱⲧ ⲉⲧⲉ ⲁⲛⲟⲕ <text:line-break/><text:span text:style-name="T1"> </text:span><text:span text:style-name="T2">(59/19) </text:span> ⲡⲉ· ⲉⲁⲛⲉ̅ⲓ̅ ⲉⲃⲟⲗ ϩ̅ⲙ̅ ⲡⲉⲛⲏⲉⲓ· <text:line-break/><text:span text:style-name="T1"> </text:span><text:span text:style-name="T2">(59/20) </text:span> ⲉⲁⲛⲉⲓ ⲉϩⲣⲁⲓ̈ ⲉⲡⲉⲓ̈ⲕⲟⲥⲙⲟⲥ· <text:line-break/><text:span text:style-name="T1"> </text:span><text:span text:style-name="T2">(59/21) </text:span> ⲁⲩⲱ ⲁⲛϣⲱⲡⲉ ϩ̅ⲙ̅ ⲡⲓⲕⲟⲥⲙⲟⲥ <text:line-break/><text:span text:style-name="T1"> </text:span><text:span text:style-name="T2">(59/22) </text:span> ϩ̅ⲛ̅ ⲛⲓⲥⲱⲙⲁ· ⲁⲩⲙⲉⲥⲧⲱⲛ ⲁⲩⲱ <text:line-break/><text:span text:style-name="T1"> </text:span><text:span text:style-name="T2">(59/23) </text:span> ⲁⲩⲡⲱⲧ ⲛ̅ⲥⲱⲛ· ⲟⲩ ⲙⲟⲛⲟⲛ <text:line-break/><text:span text:style-name="T1"> </text:span><text:span text:style-name="T2">(59/24) </text:span> ⲛⲏ ⲉⲧⲉ ⲛ̅ⲁⲧⲥⲟⲟⲩⲛ· ⲁⲗⲗⲁ ⲉⲃⲟⲗ <text:line-break/><text:span text:style-name="T1"> </text:span><text:span text:style-name="T2">(59/25) </text:span> ϩ̅ⲓ̅ⲧ̅ⲛ̅ ⲛⲏ ⲟⲛ ⲉⲧⲙⲉⲉⲩⲉ ϫⲉ ⲥⲉ <text:line-break/><text:span text:style-name="T1"> </text:span><text:span text:style-name="T2">(59/26) </text:span> ⲣ̅ⲉⲩⲡⲟⲣⲓ ⲙ̅ⲡⲣⲁⲛ ⲙ̅ⲡⲉⲭ̅ⲥ̅ ⲉⲩ‐ <text:line-break/><text:span text:style-name="T1"> </text:span><text:span text:style-name="T2">(59/27) </text:span> ϣⲟⲩⲉⲓⲧ ϩ̅ⲛ̅ ⲟⲩⲙ̅ⲛⲧ̅ⲁⲧⲥⲟⲟⲩⲛ <text:line-break/><text:span text:style-name="T1"> </text:span><text:span text:style-name="T2">(59/28) </text:span> ⲉⲛⲥⲉⲥⲟⲟⲩⲛ ⲙ̅ⲙⲟⲟⲩ ⲁⲛ ϫⲉ <text:line-break/><text:span text:style-name="T1"> </text:span><text:span text:style-name="T2">(59/29) </text:span> ⲛⲓⲙ ⲛⲉ· ⲛ̅ⲑⲉ ⲛ̅ϩⲉⲛⲧ̅ⲃ̅ⲛⲟⲟⲩⲉ <text:line-break/><text:span text:style-name="T1"> </text:span><text:span text:style-name="T2">(59/30) </text:span> ⲛ̅ⲁⲧϣⲁϫⲉ· ⲛⲏ ⲛ̅ⲧⲁⲩⲣ̅ⲣ̅ⲙ̅ϩⲉ <text:line-break/><text:span text:style-name="T1"> </text:span><text:span text:style-name="T2">(59/31) </text:span> ⲉⲃⲟⲗ ϩ̅ⲓ̅ⲧⲟⲟⲧ· ϣⲁⲩⲡⲱⲧ ⲛ̅‐ <text:line-break/><text:span text:style-name="T1"> </text:span><text:span text:style-name="T2">(59/32) </text:span> ⲥⲱⲟⲩ ⲉⲩⲙⲟⲥⲧⲉ ⲙ̅ⲙⲟⲟⲩ· <text:line-break/><text:span text:style-name="T1"> </text:span><text:span text:style-name="T2">(59/33) </text:span> ⲛⲏ ⲉⲧⲉ ⲉϣⲱⲡⲉ ⲉⲩϣⲁⲛϣⲱ <text:line-break/><text:span text:style-name="T1"> </text:span><text:span text:style-name="T2">(59/34) </text:span> ⲧ̅ⲙ̅ ⲙ̅ⲡⲣⲟ ⲉⲩⲛⲁⲣⲓⲙⲉ ϩ̅ⲛ̅ ⲟⲩⲁ‐ <text:line-break/><text:span text:style-name="T1"> </text:span><text:span text:style-name="T2">(59/35) </text:span> ϣⲁϩⲟⲙ ⲉⲙ̅ⲛ̅ ϩⲏⲩ ⲛ̅ϩⲏⲧ̅ϥ̅ ϫⲉ <text:line-break/><text:span text:style-name="T1"> </text:span><text:span text:style-name="T2">(60/1) </text:span> ⲙ̅ⲡⲟⲩⲥⲟⲩⲱⲛ̅ⲧ̅ ϩ̅ⲛ̅ ⲟⲩϫⲱⲕ· <text:line-break/><text:span text:style-name="T1"> </text:span><text:span text:style-name="T2">(60/2) </text:span> ⲁⲗⲗⲁ ⲁⲩⲣ̅ϩ̅ⲙ̅ϩⲁⲗ ⲛ̅ϫⲟⲉⲓⲥ ⲥⲛⲁⲩ <text:line-break/><text:soft-page-break/><text:span text:style-name="T1"> </text:span><text:span text:style-name="T2">(60/3) </text:span> ⲙ̅ⲛ̅ ⲟⲩⲙⲏⲏϣⲉ· ⲁⲗⲗⲁ ⲧⲉⲧⲛⲁ‐ <text:line-break/><text:span text:style-name="T1"> </text:span><text:span text:style-name="T2">(60/4) </text:span> ϫⲣⲟ ϩ̅ⲛ̅ ϩⲱⲃ ⲛⲓⲙ ϩⲣⲁⲓ̈ ϩ̅ⲛ̅ ⲟⲩ‐ <text:line-break/><text:span text:style-name="T1"> </text:span><text:span text:style-name="T2">(60/5) </text:span> ⲡⲟⲗⲉⲙⲟⲥ ⲙ̅ⲛ̅ ϩⲉⲛⲙ̅ⲗⲟⲟϩ· <text:line-break/><text:span text:style-name="T1"> </text:span><text:span text:style-name="T2">(60/6) </text:span> ⲙ̅ⲛ̅ ⲟⲩⲡⲱϣⲉ ⲛ̅ⲧⲉ ⲟⲩⲕⲱϩ <text:line-break/><text:span text:style-name="T1"> </text:span><text:span text:style-name="T2">(60/7) </text:span> ⲙ̅ⲛ̅ ⲟⲩϭⲱⲛ̅ⲧ̅· ⲁⲗⲗⲁ ϩ̅ⲙ̅ ⲡⲓⲥⲟ‐ <text:line-break/><text:span text:style-name="T1"> </text:span><text:span text:style-name="T2">(60/8) </text:span> ⲟⲩⲧ̅ⲛ̅ ⲛ̅ⲧⲉ ⲧ̅ⲛ̅ⲁⲅⲁⲡⲏ ⲉⲛϣⲟ‐ <text:line-break/><text:span text:style-name="T1"> </text:span><text:span text:style-name="T2">(60/9) </text:span> ⲟⲡ ⲛ̅ⲁⲧⲕⲁϭⲓⲁ ⲛ̅ⲁⲕⲉⲣⲁⲓⲟⲥ <text:line-break/><text:span text:style-name="T1"> </text:span><text:span text:style-name="T2">(60/10) </text:span> ⲛ̅ⲁⲅⲁⲑⲟⲥ· ⲉⲩⲛ̅ⲧⲁⲛ ⲛ̅ⲟⲩⲙⲉ‐ <text:line-break/><text:span text:style-name="T1"> </text:span><text:span text:style-name="T2">(60/11) </text:span> ⲉⲩⲉ ⲛ̅ⲧⲉ ⲡⲓⲱⲧ ϩ̅ⲛ̅ ⲟⲩⲙⲩⲥ‐ <text:line-break/><text:span text:style-name="T1"> </text:span><text:span text:style-name="T2">(60/12) </text:span> ⲧⲏⲣⲓⲟⲛ ⲛ̅ⲁⲧϣⲁϫⲉ ⲙ̅ⲙⲟϥ· <text:line-break/><text:span text:style-name="T1"> </text:span><text:span text:style-name="T2">(60/13) </text:span> ⲛⲉⲟⲩⲥⲱⲃⲉ ⲅⲁⲣ ⲡⲉ· ⲁⲛⲟⲕ <text:line-break/><text:span text:style-name="T1"> </text:span><text:span text:style-name="T2">(60/14) </text:span> ⲉⲧ̅ⲣ̅ⲙ̅ⲛ̅ⲧⲣⲉ ϫⲉ ⲛⲉⲟⲩⲥⲱⲃⲉ <text:line-break/><text:span text:style-name="T1"> </text:span><text:span text:style-name="T2">(60/15) </text:span> ⲡⲉ· ⲉⲛⲥⲉⲥⲟⲟⲩⲛ ⲁⲛ ⲛ̅ϭⲓ ⲛ̅‐ <text:line-break/><text:span text:style-name="T1"> </text:span><text:span text:style-name="T2">(60/16) </text:span> ⲁⲣⲭⲱⲛ ϫⲉ ⲟⲩϩⲱⲧ̅ⲡ̅ ⲛ̅ⲁⲧ‐ <text:line-break/><text:span text:style-name="T1"> </text:span><text:span text:style-name="T2">(60/17) </text:span> ϣⲁϫⲉ ⲙ̅ⲙⲟϥ ⲡⲉ ⲛ̅ⲧⲉ ⲟⲩⲙ̅ⲛ̅‐ <text:line-break/><text:span text:style-name="T1"> </text:span><text:span text:style-name="T2">(60/18) </text:span> ⲧⲙⲉ ⲛ̅ⲁⲧϫⲱϩ̅ⲙ̅· ⲛ̅ⲑⲉ ⲉⲧϣⲟ‐ <text:line-break/><text:span text:style-name="T1"> </text:span><text:span text:style-name="T2">(60/19) </text:span> ⲟⲡ ϩ̅ⲛ̅ ⲛ̅ϣⲏⲣⲉ ⲛ̅ⲧⲉ ⲡⲟⲩⲟⲉⲓⲛ <text:line-break/><text:span text:style-name="T1"> </text:span><text:span text:style-name="T2">(60/20) </text:span> ⲉⲧⲉ ⲁⲩⲧⲁⲙⲓⲟ ⲛ̅ⲟⲩⲁⲛⲧⲓⲙⲓ‐ <text:line-break/><text:span text:style-name="T1"> </text:span><text:span text:style-name="T2">(60/21) </text:span> ⲙⲟⲛ ⲛ̅ⲧⲟⲟⲧ̅ⲥ̅· ⲉⲁⲩⲧⲁⲩⲟ <text:line-break/><text:span text:style-name="T1"> </text:span><text:span text:style-name="T2">(60/22) </text:span> ⲛ̅ⲟⲩⲥⲃⲱ ⲛ̅ⲧⲉ ⲟⲩⲣⲉϥⲙⲟⲟⲩⲧ <text:line-break/><text:span text:style-name="T1"> </text:span><text:span text:style-name="T2">(60/23) </text:span> ⲙ̅ⲛ̅ ϩⲉⲛϭⲟⲗ· ⲁⲉⲓⲛⲉ ⲛ̅ϯⲙ̅ⲛ̅ⲧⲣ̅ⲙ̅ <text:line-break/><text:span text:style-name="T1"> </text:span><text:span text:style-name="T2">(60/24) </text:span> ϩⲉ ⲙ̅ⲛ̅ ⲧⲙ̅ⲛⲧ̅ⲁⲕⲉⲣⲁⲓⲟⲥ ⲛ̅ⲧⲉ <text:line-break/><text:span text:style-name="T1"> </text:span><text:span text:style-name="T2">(60/25) </text:span> ϯⲉⲕⲕⲗⲏⲥⲓⲁ ⲛ̅ⲧⲉⲗⲉⲓⲟⲥ· ⲉⲩ‐ <text:line-break/><text:span text:style-name="T1"> </text:span><text:span text:style-name="T2">(60/26) </text:span> ϩⲱⲧ̅ⲃ̅ ⲙ̅ⲙⲟⲟⲩ ϩ̅ⲛ̅ ⲧⲉⲩⲥⲃⲱ· <text:line-break/><text:span text:style-name="T1"> </text:span><text:span text:style-name="T2">(60/27) </text:span> ⲉⲩϩⲟⲧⲉ ⲙ̅ⲛ̅ ⲟⲩⲙ̅ⲛⲧ̅ϩ̅ⲙ̅ϩⲁⲗ· <text:line-break/><text:span text:style-name="T1"> </text:span><text:span text:style-name="T2">(60/28) </text:span> ⲙ̅ⲛ̅ ϩⲉⲛϩⲁⲣⲉϩ ⲛ̅ⲕⲟⲥⲙⲓⲕⲟⲛ <text:line-break/><text:span text:style-name="T1"> </text:span><text:span text:style-name="T2">(60/29) </text:span> ⲙ̅ⲛ̅ ⲟⲩϣ̅ⲙ̅ϣⲉ ⲉϥⲛⲏϫ ⲉⲃⲟⲗ <text:line-break/><text:span text:style-name="T1"> </text:span><text:span text:style-name="T2">(60/30) </text:span> ⲉⲩⲥⲟⲃ̅ⲕ̅ ⲛ̅ⲁⲧⲥⲃⲱ· ⲉⲛⲥⲉ‐ <text:line-break/><text:span text:style-name="T1"> </text:span><text:span text:style-name="T2">(60/31) </text:span> ϣⲱⲡ ⲉⲣⲟⲟⲩ ⲁⲛ ⲛ̅ϯⲙ̅ⲛ̅ⲧ̅† <text:line-break/><text:span text:style-name="T1"> </text:span><text:span text:style-name="T2">(60/32) </text:span> ⲉⲩⲅⲉⲛⲏⲥ ⲛ̅ⲧⲉ ϯⲙ̅ⲛ̅ⲧⲙⲉ· <text:line-break/><text:span text:style-name="T1"> </text:span><text:span text:style-name="T2">(60/33) </text:span> ⲉⲩⲙⲟⲥⲧⲉ ⲙ̅ⲡⲉⲧⲟⲩϣⲟ‐ <text:line-break/><text:span text:style-name="T1"> </text:span><text:span text:style-name="T2">(60/34) </text:span> ⲟⲡ ⲙ̅ⲙⲟϥ· ⲁⲩⲱ ⲉⲩⲙⲉ ⲙ̅‐ <text:line-break/><text:span text:style-name="T1"> </text:span><text:span text:style-name="T2">(60/35) </text:span> ⲡⲉⲧⲟⲩϣⲟⲟⲡ ⲙ̅ⲙⲟϥ ⲁⲛ· <text:line-break/><text:span text:style-name="T1"> </text:span><text:span text:style-name="T2">(60/36) </text:span> ⲟⲩ ⲅⲁⲣ ⲙ̅ⲡⲟⲩⲥⲟⲩⲱⲛ ϯ <text:line-break/><text:span text:style-name="T1"> </text:span><text:span text:style-name="T2">(61/1) </text:span> ⲅⲛⲱⲥⲓⲥ ⲛ̅ⲧⲉ ϯⲙ̅ⲛ̅ⲧ̅ⲛⲟϭ· <text:line-break/><text:span text:style-name="T1"> </text:span><text:span text:style-name="T2">(61/2) </text:span> ϫⲉ ⲉⲥϣⲟⲟⲡ ⲉⲃⲟⲗ ⲙ̅ⲡⲥⲁⲛⲧⲡⲉ <text:line-break/><text:span text:style-name="T1"> </text:span><text:span text:style-name="T2">(61/3) </text:span> ⲙ̅ⲛ̅ ⲟⲩⲡⲏⲅⲏ ⲛ̅ⲧⲉ ⲧⲙⲉ· ⲁⲩⲱ <text:line-break/><text:span text:style-name="T1"> </text:span><text:span text:style-name="T2">(61/4) </text:span> ⲟⲩⲉⲃⲟⲗ ϩ̅ⲛ̅ ⲟⲩⲙ̅ⲛⲧ̅ϩ̅ⲙ̅ϩⲁⲗ <text:line-break/><text:span text:style-name="T1"> </text:span><text:span text:style-name="T2">(61/5) </text:span> ⲁⲛ ⲧⲉ ⲙ̅ⲛ̅ ⲟⲩⲕⲱϩ· ⲁⲩⲱ ⲟⲩ‐ <text:line-break/><text:span text:style-name="T1"> </text:span><text:span text:style-name="T2">(61/6) </text:span> ϩⲟⲧⲉ ⲙ̅ⲛ̅ ⲟⲩⲱϣⲉ ⲛ̅ⲧⲉ ⲟⲩ‐ <text:line-break/><text:span text:style-name="T1"> </text:span><text:span text:style-name="T2">(61/7) </text:span> ϩⲩⲗⲏ ⲛ̅ⲕⲟⲥⲙⲓⲕⲟⲛ· ⲡⲏ ⲅⲁⲣ <text:line-break/><text:span text:style-name="T1"> </text:span><text:span text:style-name="T2">(61/8) </text:span> ⲉⲧⲉ ⲙ̅ⲡⲱⲟⲩ ⲁⲛ ⲡⲉ ⲙ̅ⲛ̅ ⲡⲏ ⲉ‐ <text:line-break/><text:span text:style-name="T1"> </text:span><text:span text:style-name="T2">(61/9) </text:span> ⲧⲉ ⲡⲱⲟⲩ ⲡⲉ ⲉⲩⲣ̅ⲭⲣⲁⲥⲑⲁⲓ ⲛ̅‐ <text:line-break/><text:span text:style-name="T1"> </text:span><text:span text:style-name="T2">(61/10) </text:span> ϩⲏⲧ̅ϥ̅ ⲉϫ̅ⲛ̅ ⲟⲩϩ̅ⲣ̅ⲧⲉ ⲙ̅ⲛ̅ ⲟⲩⲙ̅ⲛ̅ <text:line-break/><text:span text:style-name="T1"> </text:span><text:span text:style-name="T2">(61/11) </text:span> ⲧⲣ̅ⲙ̅ϩⲉ· ⲙⲁⲩⲣ̅ⲉⲡⲓⲑⲩⲙⲓ ϫⲉ <text:line-break/><text:span text:style-name="T1"> </text:span><text:span text:style-name="T2">(61/12) </text:span> ⲟⲩⲛ̅ⲧⲁⲩ ⲉⲝⲟⲩⲥⲓⲁ· ⲁⲩⲱ ⲟⲩ‐ <text:line-break/><text:span text:style-name="T1"> </text:span><text:span text:style-name="T2">(61/13) </text:span> ⲛⲟⲙⲟⲥ ⲉⲃⲟⲗ ⲙ̅ⲙⲟⲟⲩ ⲉϫ̅ⲛ̅ <text:line-break/><text:soft-page-break/><text:span text:style-name="T1"> </text:span><text:span text:style-name="T2">(61/14) </text:span> ⲛⲏ ⲉⲧⲟⲩⲛⲁⲟⲩⲟϣⲟⲩ· ⲛⲏ <text:line-break/><text:span text:style-name="T1"> </text:span><text:span text:style-name="T2">(61/15) </text:span> ⲇⲉ ⲉⲧⲉ ⲙ̅ⲛ̅ⲧⲁⲩ ϣⲁⲩⲣ̅ϩⲏⲕⲉ <text:line-break/><text:span text:style-name="T1"> </text:span><text:span text:style-name="T2">(61/16) </text:span> ⲛ̅ϭⲓ ⲛⲏ ⲉⲧⲉ ⲛ̅ϥ̅ϣⲟⲟⲡ ⲛⲁⲩ <text:line-break/><text:span text:style-name="T1"> </text:span><text:span text:style-name="T2">(61/17) </text:span> ⲁⲛ· ⲁⲩⲱ ϣⲁⲩⲟⲩⲁϣ̅ϥ̅· ⲁⲩⲱ <text:line-break/><text:span text:style-name="T1"> </text:span><text:span text:style-name="T2">(61/18) </text:span> ϣⲁⲩⲥⲱⲣ̅ⲙ̅ ⲛ̅ⲛⲏ ⲉⲧϩ̅ⲓ̅ⲧⲟⲟ‐ <text:line-break/><text:span text:style-name="T1"> </text:span><text:span text:style-name="T2">(61/19) </text:span> ⲧⲟⲩ ⲉⲩⲉ ⲛ̅ⲑⲉ ⲛ̅ⲛⲉⲧⲉⲩⲛ̅‐ <text:line-break/><text:span text:style-name="T1"> </text:span><text:span text:style-name="T2">(61/20) </text:span> ⲧⲁⲩ ⲛ̅ⲧⲙⲉ ⲛ̅ⲧⲉ ⲧⲉⲩⲙ̅ⲛ̅ⲧⲣ̅ⲙ̅ <text:line-break/><text:span text:style-name="T1"> </text:span><text:span text:style-name="T2">(61/21) </text:span> ϩⲉ· ⲛ̅ⲑⲉ ⲛ̅ⲧⲁⲩϣⲟⲡ̅ⲛ̅ ϩⲁ ⲟⲩ <text:line-break/><text:span text:style-name="T1"> </text:span><text:span text:style-name="T2">(61/22) </text:span> ⲛⲁϩ̅ⲃ̅ ⲙ̅ⲛ̅ ⲟⲩⲁⲛⲁⲅⲕⲏ ⲛ̅ⲧⲉ ⲟⲩ <text:line-break/><text:span text:style-name="T1"> </text:span><text:span text:style-name="T2">(61/23) </text:span> ϩⲁⲣⲉϩ· ⲁⲩⲱ ⲟⲩϩ̅ⲣ̅ⲧⲉ· ⲡⲁⲓ̈ ⲉϥ‐ <text:line-break/><text:span text:style-name="T1"> </text:span><text:span text:style-name="T2">(61/24) </text:span> ϣⲟⲟⲡ ϩ̅ⲛ̅ ⲟⲩⲙ̅ⲛⲧ̅ϩ̅ⲙ̅ϩⲁⲗ· ⲡⲏ‐ <text:line-break/><text:span text:style-name="T1"> </text:span><text:span text:style-name="T2">(61/25) </text:span> ⲇⲉ ⲉⲧⲟⲩⲉⲓⲛⲉ ⲙ̅ⲙⲟϥ ϩ̅ⲛ̅ ⲟⲩ‐ <text:line-break/><text:span text:style-name="T1"> </text:span><text:span text:style-name="T2">(61/26) </text:span> ⲁⲛⲁⲅⲕⲏ ⲛ̅ⲟⲩⲃⲓⲁ ⲙ̅ⲛ̅ ⲟⲩⲁⲡⲓ‐ <text:line-break/><text:span text:style-name="T1"> </text:span><text:span text:style-name="T2">(61/27) </text:span> ⲗⲏ· ⲉⲁⲩϩⲁⲣⲉϩ ⲉⲣⲟϥ ⲉⲃⲟⲗ ϩ̅ⲓ̅‐ <text:line-break/><text:span text:style-name="T1"> </text:span><text:span text:style-name="T2">(61/28) </text:span> ⲧ̅ⲙ̅ ⲡⲛⲟⲩⲧⲉ· ⲡⲓⲉⲩⲅⲉⲛⲏⲥ <text:line-break/><text:span text:style-name="T1"> </text:span><text:span text:style-name="T2">(61/29) </text:span> ⲇⲉ ⲧⲏⲣ̅ϥ̅ ⲛ̅ⲧⲉ ϯⲙ̅ⲛⲧ̅ⲉⲓⲱⲧ <text:line-break/><text:span text:style-name="T1"> </text:span><text:span text:style-name="T2">(61/30) </text:span> ⲙⲁⲩϩⲁⲣⲉϩ ⲉⲣⲟϥ ⲉϥⲁⲣⲉϩ ⲉⲡⲉ‐ <text:line-break/><text:span text:style-name="T1"> </text:span><text:span text:style-name="T2">(61/31) </text:span> ⲧ̅ⲛ̅ⲧⲟⲟⲧ̅ϥ̅ ⲟⲩⲁⲁϥ ⲉϫ̅ⲛ̅ ⲟⲩϣⲁ‐ <text:line-break/><text:span text:style-name="T1"> </text:span><text:span text:style-name="T2">(61/32) </text:span> ϫⲉ ⲙ̅ⲛ̅ ⲟⲩⲁⲛⲁⲅⲕⲏ ⲉϣⲁϥϩⲱ‐ <text:line-break/><text:span text:style-name="T1"> </text:span><text:span text:style-name="T2">(61/33) </text:span> ⲧ̅ⲡ̅ ⲙ̅ⲛ̅ ⲡⲉϥⲟⲩⲱϣⲉ· ⲡⲁϯⲉⲛ‐ <text:line-break/><text:span text:style-name="T1"> </text:span><text:span text:style-name="T2">(61/34) </text:span> ⲛⲟⲓⲁ ⲟⲩⲁⲁⲥ ⲛ̅ⲧⲉ ϯⲙⲛ̅ⲧ̅ⲉⲓ‐ <text:line-break/><text:span text:style-name="T1"> </text:span><text:span text:style-name="T2">(61/35) </text:span> ⲱⲧ ⲉⲧⲣⲉⲥϣⲱⲡⲉ ⲛ̅ⲧⲉⲗⲉⲓ‐ <text:line-break/><text:span text:style-name="T1"> </text:span><text:span text:style-name="T2">(61/36) </text:span> ⲟⲥ ⲁⲩⲱ ⲛ̅ⲁⲣⲣⲏⲧⲟⲛ ⲉⲃⲟⲗ ϩ̅ⲓ̅‐ <text:line-break/><text:span text:style-name="T1"> </text:span><text:span text:style-name="T2">(62/1) </text:span> ⲧ̅ⲙ̅ ⲡⲓⲙⲟⲟⲩ ⲉⲧⲟⲛ̅ϩ̅ ⲉϣⲱⲡⲉ <text:line-break/><text:span text:style-name="T1"> </text:span><text:span text:style-name="T2">(62/2) </text:span> ϩ̅ⲛ̅ ⲟⲩⲙ̅ⲛⲧ̅ⲥⲃⲁⲉ ⲙ̅ⲛ̅ ⲛⲉⲧ̅ⲛ̅‐ <text:line-break/><text:span text:style-name="T1"> </text:span><text:span text:style-name="T2">(62/3) </text:span> ⲣⲏⲩ· ⲟⲩ ⲙⲟⲛⲟⲛ ϩ̅ⲙ̅ ⲡϣⲁϫⲉ <text:line-break/><text:span text:style-name="T1"> </text:span><text:span text:style-name="T2">(62/4) </text:span> ⲙ̅ⲡⲥⲱⲧ̅ⲙ̅· ⲁⲗⲗⲁ ϩ̅ⲛ̅ ⲟⲩϩⲱⲃ <text:line-break/><text:span text:style-name="T1"> </text:span><text:span text:style-name="T2">(62/5) </text:span> ⲙ̅ⲛ̅ ⲟⲩϣⲁϫⲉ ⲉϥϫⲏⲕ ⲉⲃⲟⲗ· <text:line-break/><text:span text:style-name="T1"> </text:span><text:span text:style-name="T2">(62/6) </text:span> ⲥⲉⲙ̅ⲡϣⲁ ⲅⲁⲣ ⲛ̅ⲥⲙ̅ⲛ̅ⲧⲟⲩ ⲛ̅‐ <text:line-break/><text:span text:style-name="T1"> </text:span><text:span text:style-name="T2">(62/7) </text:span> ϯϩⲉ ⲛ̅ϭⲓ ⲛⲓⲧⲉⲗⲓⲟⲥ· ⲁⲩⲱ ⲛ̅ⲥⲉ <text:line-break/><text:span text:style-name="T1"> </text:span><text:span text:style-name="T2">(62/8) </text:span> ϩⲱⲧ̅ⲡ̅ ⲛ̅ⲙ̅ⲙⲁⲉⲓ· ϫⲉ ⲛ̅ⲛⲟⲩϫⲓ <text:line-break/><text:span text:style-name="T1"> </text:span><text:span text:style-name="T2">(62/9) </text:span> ⲉⲃⲟⲗ ϩ̅ⲛ̅ ⲙ̅ⲙ̅ⲛⲧ̅ϫⲁϫⲉ ⲛⲓⲙ· ϩ̅ⲛ̅ <text:line-break/><text:span text:style-name="T1"> </text:span><text:span text:style-name="T2">(62/10) </text:span> ⲟⲩⲙ̅ⲛ̅ⲧ̅ϣⲃⲏⲣ ⲉⲛⲁⲛⲟⲩⲥ· ⲉⲓ̈ <text:line-break/><text:span text:style-name="T1"> </text:span><text:span text:style-name="T2">(62/11) </text:span> ⲉⲓⲣⲉ ⲛ̅ϩⲱⲃ ⲛⲓⲙ ϩ̅ⲙ̅ ⲡⲓⲁⲅⲁⲑⲟⲥ· <text:line-break/><text:span text:style-name="T1"> </text:span><text:span text:style-name="T2">(62/12) </text:span> ⲡⲁⲓ̈ ⲅⲁⲣ ⲡⲉ ⲡϩⲱⲧ̅ⲡ̅ ⲛ̅ⲧⲉ ϯⲙ̅ⲛ̅‐ <text:line-break/><text:span text:style-name="T1"> </text:span><text:span text:style-name="T2">(62/13) </text:span> ⲧⲙⲉ· ϫⲉ ⲛ̅ⲛⲉⲗⲁⲁⲩ ⲛ̅ⲁⲛⲧⲓⲕⲓ‐ <text:line-break/><text:span text:style-name="T1"> </text:span><text:span text:style-name="T2">(62/14) </text:span> ⲙⲉⲛⲟⲥ ϣⲱⲡⲉ ⲛⲁⲩ· ⲡⲏ ⲇⲉ <text:line-break/><text:span text:style-name="T1"> </text:span><text:span text:style-name="T2">(62/15) </text:span> ⲧⲏⲣ̅ϥ̅ ⲉⲧⲉ ϣⲁϥⲡⲱϣⲉ ⲁⲩⲱ <text:line-break/><text:span text:style-name="T1"> </text:span><text:span text:style-name="T2">(62/16) </text:span> ⲉϥⲛⲁϭ̅ⲛ̅ ϩⲏⲧⲟⲩ ⲧⲏⲣⲟⲩ ⲁⲛ· <text:line-break/><text:span text:style-name="T1"> </text:span><text:span text:style-name="T2">(62/17) </text:span> ϫⲉ ϣⲁϥⲡⲱϣⲉ· ⲁⲩⲱ ⲛ̅ⲟⲩ‐ <text:line-break/><text:span text:style-name="T1"> </text:span><text:span text:style-name="T2">(62/18) </text:span> ϣⲃⲏⲣ ⲁⲛ ⲡⲉ· ϣⲁϥⲣ̅ϫⲁϫⲉ ⲉⲣⲟ‐ <text:line-break/><text:span text:style-name="T1"> </text:span><text:span text:style-name="T2">(62/19) </text:span> ⲟⲩ ⲧⲏⲣⲟⲩ· ⲡⲏ ⲇⲉ ⲉⲧϣⲟⲟⲡ <text:line-break/><text:span text:style-name="T1"> </text:span><text:span text:style-name="T2">(62/20) </text:span> ϩ̅ⲛ̅ ⲟⲩϯ ⲙⲉⲧⲉ ⲙ̅ⲛ̅ ⲟⲩⲙ̅ⲛⲧ̅‐ <text:line-break/><text:span text:style-name="T1"> </text:span><text:span text:style-name="T2">(62/21) </text:span> ϣⲃⲏⲣ ⲛ̅ⲧⲉ ⲟⲩⲙ̅ⲛ̅ⲧ̅ⲙⲁⲉⲓⲥⲟⲛ <text:line-break/><text:span text:style-name="T1"> </text:span><text:span text:style-name="T2">(62/22) </text:span> ϩ̅ⲛ̅ ⲟⲩⲫⲩⲥⲓⲥ ⲁⲩⲱ ϩ̅ⲛ̅ ⲟⲩⲕⲱ ⲉ‐ <text:line-break/><text:span text:style-name="T1"> </text:span><text:span text:style-name="T2">(62/23) </text:span> ϩⲣⲁⲓ̈ ⲁⲛ· ϩ̅ⲛ̅ ⲟⲩⲡⲧⲏⲣ̅ϥ̅· ⲁⲩⲱ ϩ̅ⲛ̅ <text:line-break/><text:span text:style-name="T1"> </text:span><text:span text:style-name="T2">(62/24) </text:span> ⲟⲩⲙⲉⲣⲟⲥ ⲁⲛ· ⲡⲁⲓ̈ ⲡⲉ ⲡⲓⲟⲩⲱϣ <text:line-break/><text:soft-page-break/><text:span text:style-name="T1"> </text:span><text:span text:style-name="T2">(62/25) </text:span> ⲛⲁⲙⲉ ⲛ̅ⲧⲉ ⲡⲓⲱⲧ· ⲡⲁⲓ̈ ⲡⲉ ⲡⲓ‐ <text:line-break/><text:span text:style-name="T1"> </text:span><text:span text:style-name="T2">(62/26) </text:span> ⲕⲁⲑⲟⲗⲓⲕⲟⲛ ⲙ̅ⲛ̅ ϯⲁⲅⲁⲡⲏ ⲉⲧ‐ <text:line-break/><text:span text:style-name="T1"> </text:span><text:span text:style-name="T2">(62/27) </text:span> ϫⲏⲕ· ⲛⲉⲟⲩⲥⲱⲃⲉ ⲅⲁⲣ ⲡⲉ ⲁ̅ⲇ̅ⲁ̅ⲙ̅ <text:line-break/><text:span text:style-name="T1"> </text:span><text:span text:style-name="T2">(62/28) </text:span> ⲛ̅ⲧⲁⲩⲧⲁⲙⲓⲟϥ ⲡⲁⲣⲁ ⲡϣⲱⲗ̅ϩ̅ <text:line-break/><text:span text:style-name="T1"> </text:span><text:span text:style-name="T2">(62/29) </text:span> ⲛ̅ⲛⲟⲩⲧⲩⲡⲟⲥ ⲛ̅ⲧⲉ ⲟⲩⲣⲱⲙⲉ <text:line-break/><text:span text:style-name="T1"> </text:span><text:span text:style-name="T2">(62/30) </text:span> ⲉⲃⲟⲗ ϩ̅ⲓ̅ⲧⲟⲟⲧ̅ϥ̅ ⲙ̅ⲡⲓⲙⲉϩⲥⲁ <text:line-break/><text:span text:style-name="T1"> </text:span><text:span text:style-name="T2">(62/31) </text:span> ϣ̅ϥ̅· ϩⲱⲥ ⲉⲁϥϣⲱⲡⲉ ⲉϥϫⲟⲟⲣ <text:line-break/><text:span text:style-name="T1"> </text:span><text:span text:style-name="T2">(62/32) </text:span> ⲉϫⲱⲓ̈ ⲙ̅ⲛ̅ ⲛⲁⲥⲛⲏⲩ· ⲁⲛⲟⲛ <text:line-break/><text:span text:style-name="T1"> </text:span><text:span text:style-name="T2">(62/33) </text:span> ⲉⲛϣⲟⲟⲡ ⲛ̅ⲁⲧⲕⲁϭⲓⲁ ϣⲁⲣⲟϥ <text:line-break/><text:span text:style-name="T1"> </text:span><text:span text:style-name="T2">(62/34) </text:span> ⲉⲛⲡ̅ⲛ̅ⲣ̅ⲛⲟⲃⲉ· ⲛⲉⲟⲩⲥⲱⲃⲉ <text:line-break/><text:span text:style-name="T1"> </text:span><text:span text:style-name="T2">(62/35) </text:span> ⲇⲉ ⲡⲉ ⲁⲃⲣⲁϩⲁⲙ· ⲙ̅ⲛ̅ ⲓ̈ⲥⲁⲁⲕ <text:line-break/><text:span text:style-name="T1"> </text:span><text:span text:style-name="T2">(62/36) </text:span> ⲙ̅ⲛ̅ ⲓ̈ⲁⲕⲱⲃ· ⲉⲁⲩϯ ⲣⲁⲛ ⲉⲣⲟⲟⲩ <text:line-break/><text:span text:style-name="T1"> </text:span><text:span text:style-name="T2">(62/37) </text:span> ⲉⲃⲟⲗ ϩ̅ⲓ̅ⲧ̅ⲙ̅ ⲡⲓⲙⲉϩⲥⲁϣ̅ϥ̅ ⲛ̅ϭⲓ <text:line-break/><text:span text:style-name="T1"> </text:span><text:span text:style-name="T2">(62/38) </text:span> ⲛ̅ⲉⲓⲟⲧⲉ ⲡⲁⲣⲁ ⲡϣⲱⲗ̅ϩ̅· ϩⲱⲥ <text:line-break/><text:span text:style-name="T1"> </text:span><text:span text:style-name="T2">(63/1) </text:span> ⲉⲁϥϣⲱⲡⲉ ⲉϥϫⲟⲟⲣ ⲉϫⲱⲓ̈ <text:line-break/><text:span text:style-name="T1"> </text:span><text:span text:style-name="T2">(63/2) </text:span> ⲙ̅ⲛ̅ ⲛⲁⲥⲛⲏⲩ· ⲁⲛⲟⲛ ⲉⲛⲉ ⲛ̅‐ <text:line-break/><text:span text:style-name="T1"> </text:span><text:span text:style-name="T2">(63/3) </text:span> ⲁⲧⲕⲁϭⲓⲁ ϣⲁⲣⲟϥ ⲉⲙⲡ̅ⲛ̅ⲣ̅ⲛⲟ‐ <text:line-break/><text:span text:style-name="T1"> </text:span><text:span text:style-name="T2">(63/4) </text:span> ⲃⲉ· ⲛⲉⲟⲩⲥⲱⲃⲉ ⲡⲉ ⲇⲁⲩⲉⲓⲇ <text:line-break/><text:span text:style-name="T1"> </text:span><text:span text:style-name="T2">(63/5) </text:span> ⲉⲁⲩϯ ⲣⲁⲛ ⲉⲡⲉϥϣⲏⲣⲉ ϫⲉ ⲡϣⲏ‐ <text:line-break/><text:span text:style-name="T1"> </text:span><text:span text:style-name="T2">(63/6) </text:span> ⲣⲉ ⲙ̅ⲡⲣⲱⲙⲉ· ⲉⲁⲩⲣ̅ⲉⲛⲉⲣⲅⲉⲓ <text:line-break/><text:span text:style-name="T1"> </text:span><text:span text:style-name="T2">(63/7) </text:span> ⲉⲣⲟϥ ⲉⲃⲟⲗ ϩ̅ⲓ̅ⲧ̅ⲛ̅ ⲡⲓⲙⲉϩⲥⲁϣ̅ϥ̅· <text:line-break/><text:span text:style-name="T1"> </text:span><text:span text:style-name="T2">(63/8) </text:span> ϩⲱⲥ ⲉⲁϥϣⲱⲡⲉ ⲉϥϫⲟⲟⲣ ⲉϫⲱⲓ̈ <text:line-break/><text:span text:style-name="T1"> </text:span><text:span text:style-name="T2">(63/9) </text:span> ⲙ̅ⲛ̅ ⲛⲁϣⲃ̅ⲣ̅ⲛ̅ⲅⲉⲛⲟⲥ· ⲁⲛⲟⲛ <text:line-break/><text:span text:style-name="T1"> </text:span><text:span text:style-name="T2">(63/10) </text:span> ⲇⲉ ⲉⲛⲟ ⲛ̅ⲁⲧⲕⲁϭⲓⲁ ϣⲁⲣⲟϥ ⲙ̅‐ <text:line-break/><text:span text:style-name="T1"> </text:span><text:span text:style-name="T2">(63/11) </text:span> ⲡ̅ⲛ̅ⲣ̅ⲛⲟⲃⲉ· ⲛⲉⲟⲩⲥⲱⲃⲉ ⲡⲉ ⲥⲟ‐ <text:line-break/><text:span text:style-name="T1"> </text:span><text:span text:style-name="T2">(63/12) </text:span> ⲗⲟⲙⲱⲛ ⲉϥⲙⲉⲉⲩⲉ ϫⲉ ⲟⲩⲭ̅ⲥ̅ <text:line-break/><text:span text:style-name="T1"> </text:span><text:span text:style-name="T2">(63/13) </text:span> ⲡⲉ· ⲉⲁϥϫⲓⲥⲉ ⲛ̅ϩⲏⲧ ⲉⲃⲟⲗ ϩ̅ⲓ̅ⲧ̅ⲛ̅ <text:line-break/><text:span text:style-name="T1"> </text:span><text:span text:style-name="T2">(63/14) </text:span> ⲡⲓⲙⲉϩⲥⲁϣ̅ϥ̅· ϩⲱⲥ ⲉⲁϥϣⲱⲡⲉ <text:line-break/><text:span text:style-name="T1"> </text:span><text:span text:style-name="T2">(63/15) </text:span> ⲉϥϫⲟⲟⲣ ⲉϫⲱⲓ̈ ⲙ̅ⲛ̅ ⲛⲁⲥⲛⲏⲟⲩ· <text:line-break/><text:span text:style-name="T1"> </text:span><text:span text:style-name="T2">(63/16) </text:span> ⲁⲛⲟⲛ ⲇⲉ ⲉⲛⲉ ⲛ̅ⲁⲧⲕⲁϭⲓⲁ ϣⲁ‐ <text:line-break/><text:span text:style-name="T1"> </text:span><text:span text:style-name="T2">(63/17) </text:span> ⲣⲟϥ ⲙ̅ⲡⲓⲣ̅ⲛⲟⲃⲉ· ⲛⲉϩⲉⲛⲥⲱ <text:line-break/><text:span text:style-name="T1"> </text:span><text:span text:style-name="T2">(63/18) </text:span> ⲃⲉ ⲛⲉ ⲛⲓⲓ̅ⲃ̅ ⲙ̅ⲡⲣⲟⲫⲏⲧⲏⲥ ⲉⲁⲩ‐ <text:line-break/><text:span text:style-name="T1"> </text:span><text:span text:style-name="T2">(63/19) </text:span> ⲉⲓ ⲉⲃⲟⲗ ⲛ̅ⲁⲧⲓⲙⲓⲙⲟⲛ ⲛ̅ⲧⲉ <text:line-break/><text:span text:style-name="T1"> </text:span><text:span text:style-name="T2">(63/20) </text:span> ⲛⲓⲡⲣⲟⲫⲏⲧⲏⲥ ⲙ̅ⲙⲉ· ⲁⲩϣⲱ‐ <text:line-break/><text:span text:style-name="T1"> </text:span><text:span text:style-name="T2">(63/21) </text:span> ⲡⲉ ⲡⲁⲣⲁ ⲡϣⲱⲗ̅ϩ̅ ⲉⲃⲟⲗ ϩ̅ⲓ̅ⲧⲟⲟ‐ <text:line-break/><text:span text:style-name="T1"> </text:span><text:span text:style-name="T2">(63/22) </text:span> ⲧ̅ϥ̅ ⲙ̅ⲡⲓⲙⲉϩⲥⲁϣ̅ϥ̅· ϩⲱⲥ ⲉ‐ <text:line-break/><text:span text:style-name="T1"> </text:span><text:span text:style-name="T2">(63/23) </text:span> ⲁϥϣⲱⲡⲉ ⲉϥϫⲟⲟⲣ ⲉϫⲱⲉⲓ <text:line-break/><text:span text:style-name="T1"> </text:span><text:span text:style-name="T2">(63/24) </text:span> ⲙ̅ⲛ̅ ⲛⲁⲥⲛⲏⲩ· ⲁⲛⲟⲛ ⲇⲉ ⲉⲛⲟ <text:line-break/><text:span text:style-name="T1"> </text:span><text:span text:style-name="T2">(63/25) </text:span> ⲛ̅ⲁⲧⲕⲁϭⲓⲁ ϣⲁⲣⲟϥ ⲉⲛⲡ̅ⲛ̅ⲣ̅ⲛⲟ <text:line-break/><text:span text:style-name="T1"> </text:span><text:span text:style-name="T2">(63/26) </text:span> ⲃⲉ· ⲛⲉⲟⲩⲥⲱⲃⲉ ⲡⲉ ⲙⲱⲩ̈ <text:line-break/><text:span text:style-name="T1"> </text:span><text:span text:style-name="T2">(63/27) </text:span> ⲥⲏⲥ ⲟⲩϩ̅ⲙ̅ϩⲁⲗ ⲙ̅ⲡⲓⲥⲧⲟⲥ <text:line-break/><text:span text:style-name="T1"> </text:span><text:span text:style-name="T2">(63/28) </text:span> ⲉⲁⲩϯ ⲣⲁⲛ ⲉⲣⲟϥ ϫⲉ ⲡⲓϣⲃⲏⲣ· <text:line-break/><text:span text:style-name="T1"> </text:span><text:span text:style-name="T2">(63/29) </text:span> ⲉⲁⲩⲣ̅ⲙ̅ⲛ̅ⲧⲣⲉ ⲉⲧⲃⲏⲏⲧ̅ϥ̅ ϩ̅ⲛ̅ <text:line-break/><text:span text:style-name="T1"> </text:span><text:span text:style-name="T2">(63/30) </text:span> ⲟⲩⲙ̅ⲛ̅ⲧ̅ϣⲁϥⲧⲉ· ⲉⲧⲉ ⲙ̅ⲡⲉϥ‐ <text:line-break/><text:span text:style-name="T1"> </text:span><text:span text:style-name="T2">(63/31) </text:span> ⲥⲟⲩⲱⲛ̅ⲧ̅ ⲉⲛⲉϩ· ⲟⲩⲧⲉ ⲛ̅ⲧⲟϥ‐ <text:line-break/><text:span text:style-name="T1"> </text:span><text:span text:style-name="T2">(63/32) </text:span> ⲟⲩⲧⲉ ⲛⲉⲧϩⲁⲧⲉϥⲉϩⲏ· ϫⲓⲛ <text:line-break/><text:span text:style-name="T1"> </text:span><text:span text:style-name="T2">(63/33) </text:span> ⲁⲇⲁⲙ· ϣⲁ ⲙⲱⲩⲥⲏⲥ· ⲙ̅ⲛ̅ ⲓ̈ⲱ‐ <text:line-break/><text:soft-page-break/><text:span text:style-name="T1"> </text:span><text:span text:style-name="T2">(63/34) </text:span> ϩⲁⲛⲛⲏⲥ ⲡⲃⲁⲡⲧⲓⲥⲧⲏⲥ ⲙ̅ⲡⲉ‐ <text:line-break/><text:span text:style-name="T1"> </text:span><text:span text:style-name="T2">(63/35) </text:span> ⲗⲁⲁⲩ ⲛ̅ϩⲏⲧⲟⲩ ⲥⲟⲩⲱⲛ̅ⲧ̅· ⲟⲩⲧⲉ <text:line-break/><text:span text:style-name="T1"> </text:span><text:span text:style-name="T2">(64/1) </text:span> ⲛⲁⲥⲛⲏⲟⲩ· ⲛⲉⲟⲩⲥⲃⲱ ⲅⲁⲣ ⲛ̅‐ <text:line-break/><text:span text:style-name="T1"> </text:span><text:span text:style-name="T2">(64/2) </text:span> ⲧⲉ ϩⲉⲛⲁⲅⲅⲉⲗⲟⲥ ⲛⲉⲧ̅ⲛ̅ⲧⲟⲟⲧⲟⲩ <text:line-break/><text:span text:style-name="T1"> </text:span><text:span text:style-name="T2">(64/3) </text:span> ⲉϩⲁⲣⲉϩ ⲉϩⲉⲛϩⲣⲏⲩⲉ ⲙ̅ⲛ̅ ⲟⲩ‐ <text:line-break/><text:span text:style-name="T1"> </text:span><text:span text:style-name="T2">(64/4) </text:span> ⲙ̅ⲛ̅ⲧ̅ϩ̅ⲙ̅ϩⲁⲗ ⲉⲥⲥⲁϣⲉ· ⲉⲙ‐ <text:line-break/><text:span text:style-name="T1"> </text:span><text:span text:style-name="T2">(64/5) </text:span> ⲡⲟⲩⲥⲟⲩⲱⲛ ⲟⲩⲙ̅ⲛ̅ⲧⲙⲉ ⲉⲛⲉϩ <text:line-break/><text:span text:style-name="T1"> </text:span><text:span text:style-name="T2">(64/6) </text:span> ⲟⲩⲧⲉ ⲛ̅ⲥⲉⲛⲁⲥⲟⲩⲱⲛ̅ⲥ̅ ⲁⲛ· <text:line-break/><text:span text:style-name="T1"> </text:span><text:span text:style-name="T2">(64/7) </text:span> ⲟⲩⲛ̅ ⲟⲩⲛⲟϭ ⲅⲁⲣ ⲛ̅ⲣ̅ϩ̅ⲁⲗ ϣⲟⲟⲡ <text:line-break/><text:span text:style-name="T1"> </text:span><text:span text:style-name="T2">(64/8) </text:span> ϩ̅ⲓ̅ϫ̅ⲛ̅ ⲧⲉⲩⲯⲩⲭⲏ· ⲉⲙ̅ⲛ̅ϭⲟⲙ <text:line-break/><text:span text:style-name="T1"> </text:span><text:span text:style-name="T2">(64/9) </text:span> ⲙ̅ⲙⲟⲟⲩ ⲉϭ̅ⲛ̅ ⲟⲩⲛⲟⲩⲥ ⲛ̅ⲧⲉ <text:line-break/><text:span text:style-name="T1"> </text:span><text:span text:style-name="T2">(64/10) </text:span> ⲟⲩⲙ̅ⲛ̅ⲧⲣ̅ⲙ̅ϩⲉ ⲉⲛⲉϩ ⲉⲥⲟⲩⲱ‐ <text:line-break/><text:span text:style-name="T1"> </text:span><text:span text:style-name="T2">(64/11) </text:span> ⲛ̅ϥ̅· ϣⲁⲛⲧⲟⲩⲥⲟⲩⲱⲛ ⲡϣⲏ‐ <text:line-break/><text:span text:style-name="T1"> </text:span><text:span text:style-name="T2">(64/12) </text:span> ⲣⲉ ⲙ̅ⲡⲣⲱⲙⲉ· ⲉⲧⲃⲉ ⲡⲁⲓ̈ⲱⲧ <text:line-break/><text:span text:style-name="T1"> </text:span><text:span text:style-name="T2">(64/13) </text:span> ⲇⲉ ⲁⲛⲟⲕ ⲡⲏ ⲉⲧⲉ ⲙ̅ⲡⲉⲡⲕⲟⲥ‐ <text:line-break/><text:span text:style-name="T1"> </text:span><text:span text:style-name="T2">(64/14) </text:span> ⲙⲟⲥ ⲥⲟⲩⲱⲛ̅ϥ̅· ⲁⲩⲱ ⲉⲧⲃⲉ ⲡⲁⲓ̈ <text:line-break/><text:span text:style-name="T1"> </text:span><text:span text:style-name="T2">(64/15) </text:span> ⲁϥⲧⲱⲱⲛ ⲉϫⲱⲓ̈ ⲙ̅ⲛ̅ ⲛⲁⲥⲛⲏⲩ· <text:line-break/><text:span text:style-name="T1"> </text:span><text:span text:style-name="T2">(64/16) </text:span> ⲁⲛⲟⲛ ⲇⲉ ⲉⲛⲟ ⲛ̅ⲁⲧⲕⲁϭⲓⲁ ϣⲁ‐ <text:line-break/><text:span text:style-name="T1"> </text:span><text:span text:style-name="T2">(64/17) </text:span> ⲣⲟϥ ⲙ̅ⲡ̅ⲛ̅ⲣ̅ⲛⲟⲃⲉ· ⲛⲉⲟⲩⲥⲱ‐ <text:line-break/><text:span text:style-name="T1"> </text:span><text:span text:style-name="T2">(64/18) </text:span> ⲃⲉ ⲅⲁⲣ ⲡⲉ ⲡⲓⲁⲣⲭⲱⲛ ϫⲉ ⲁϥϫⲟⲟⲥ <text:line-break/><text:span text:style-name="T1"> </text:span><text:span text:style-name="T2">(64/19) </text:span> ϫⲉ ⲁⲛⲟⲕ ⲡⲉ ⲡⲛⲟⲩⲧⲉ· ⲁⲩⲱ <text:line-break/><text:span text:style-name="T1"> </text:span><text:span text:style-name="T2">(64/20) </text:span> ⲙ̅ⲙ̅ⲛ̅ ⲡⲉⲧⲛⲉⲁϥ ⲉⲣⲟⲓ̈· ⲁⲛⲟⲕ ⲟⲩ‐ <text:line-break/><text:span text:style-name="T1"> </text:span><text:span text:style-name="T2">(64/21) </text:span> ⲁⲁⲧ ⲡⲉ ⲡⲓⲱⲧ ⲡϫⲟⲉⲓⲥ· ⲁⲩⲱ <text:line-break/><text:span text:style-name="T1"> </text:span><text:span text:style-name="T2">(64/22) </text:span> ⲙ̅ⲙ̅ⲛ̅ ⲕⲉⲟⲩⲁ ⲛ̅ⲥⲁ ⲁⲛⲟⲕ· ⲁⲛⲟⲕ <text:line-break/><text:span text:style-name="T1"> </text:span><text:span text:style-name="T2">(64/23) </text:span> ⲟⲩⲛⲟⲩⲧⲉ ⲛ̅ⲣⲉϥⲕⲱϩ ⲉϣⲁⲉⲓ <text:line-break/><text:span text:style-name="T1"> </text:span><text:span text:style-name="T2">(64/24) </text:span> ⲉⲓⲛⲉ ⲛ̅ⲛ̅ⲛⲟⲃⲉ ⲛ̅ⲛ̅ⲉⲓⲟⲧⲉ ⲉϩⲣⲁⲓ̈ <text:line-break/><text:span text:style-name="T1"> </text:span><text:span text:style-name="T2">(64/25) </text:span> ⲉϫ̅ⲛ̅ ⲛ̅ϣⲏⲣⲉ ϣⲁ ϣⲟⲙⲧⲉ ⲙ̅ⲛ̅ <text:line-break/><text:span text:style-name="T1"> </text:span><text:span text:style-name="T2">(64/26) </text:span> ϥⲧⲟ ⲛ̅ⲅⲉⲛⲉⲁ ϩⲱⲥ ⲉⲁϥϣⲱ <text:line-break/><text:span text:style-name="T1"> </text:span><text:span text:style-name="T2">(64/27) </text:span> ⲡⲉ ⲉϥϫⲟⲟⲣ ⲉϫⲱⲓ̈ ⲙ̅ⲛ̅ ⲛⲁⲥⲛⲏ‐ <text:line-break/><text:span text:style-name="T1"> </text:span><text:span text:style-name="T2">(64/28) </text:span> ⲟⲩ· ⲁⲛⲟⲛ ⲇⲉ ⲉⲛⲟ ⲛ̅ⲁⲧⲕⲁ‐ <text:line-break/><text:span text:style-name="T1"> </text:span><text:span text:style-name="T2">(64/29) </text:span> ϭⲓⲁ ϣⲁⲣⲟϥ ⲉⲙⲡ̅ⲛ̅ⲣ̅ⲛⲟⲃⲉ· ⲉ‐ <text:line-break/><text:span text:style-name="T1"> </text:span><text:span text:style-name="T2">(64/30) </text:span> ⲁⲛⲣ̅ϫⲟⲉⲓⲥ ⲉⲧⲉϥⲥⲃⲱ ⲛ̅ϯϩⲉ <text:line-break/><text:span text:style-name="T1"> </text:span><text:span text:style-name="T2">(64/31) </text:span> ⲉϥϣⲟⲟⲡ ϩ̅ⲛ̅ ⲟⲩⲉⲟⲟⲩ ⲉϥ‐ <text:line-break/><text:span text:style-name="T1"> </text:span><text:span text:style-name="T2">(64/32) </text:span> ϣⲟⲩⲉⲓⲧ· ⲁⲩⲱ ⲉϥϯ ⲙⲉⲧⲉ‐ <text:line-break/><text:span text:style-name="T1"> </text:span><text:span text:style-name="T2">(64/33) </text:span> ⲁⲛ ⲙ̅ⲛ̅ ⲡⲉⲛⲉⲓⲱⲧ· ⲁⲩⲱ ⲛ̅ϯ‐ <text:line-break/><text:span text:style-name="T1"> </text:span><text:span text:style-name="T2">(64/34) </text:span> ϩⲉ ⲉⲃⲟⲗ ϩ̅ⲓ̅ⲧ̅ⲛ̅ ⲧ̅ⲛ̅ⲙ̅ⲛⲧ̅ϣⲃⲏⲣ <text:line-break/><text:span text:style-name="T1"> </text:span><text:span text:style-name="T2">(64/35) </text:span> ⲁⲛⲁⲙⲁϩⲧⲉ ⲛ̅ⲧⲉϥⲥⲃⲱ ⲉϥ‐ <text:line-break/><text:span text:style-name="T1"> </text:span><text:span text:style-name="T2">(64/36) </text:span> ϫⲟⲥⲉ ⲛ̅ϩⲏⲧ ⲛ̅ϩⲣⲁⲓ̈ ϩ̅ⲛ̅ ⲟⲩⲉⲟ‐ <text:line-break/><text:span text:style-name="T1"> </text:span><text:span text:style-name="T2">(64/37) </text:span> ⲟⲩ ⲉϥϣⲟⲩⲉⲓⲧ· ⲁⲩⲱ ⲉϥ‐ <text:line-break/><text:span text:style-name="T1"> </text:span><text:span text:style-name="T2">(64/38) </text:span> ϯ ⲙⲉⲧⲉ ⲁⲛ ⲙ̅ⲛ̅ ⲡⲉⲛⲉⲓⲱⲧ <text:line-break/><text:span text:style-name="T1"> </text:span><text:span text:style-name="T2">(64/39) </text:span> ⲛⲉⲟⲩⲥⲱⲃⲉ ⲅⲁⲣ ⲡⲉ ⲙ̅ⲛ̅ ⲟⲩ‐ <text:line-break/><text:span text:style-name="T1"> </text:span><text:span text:style-name="T2">(65/1) </text:span> ⲕⲣⲓⲥⲓⲥ ⲙ̅ⲛ̅ ⲟⲩⲙ̅ⲛⲧ̅ⲡⲣⲟⲫⲏ‐ <text:line-break/><text:span text:style-name="T1"> </text:span><text:span text:style-name="T2">(65/2) </text:span> ⲧⲏⲥ ⲛ̅ⲛⲟⲩϫ· ⲱ̅ ⲛⲏ ⲉⲧⲉ ⲛ̅ⲥⲉ‐ <text:line-break/><text:span text:style-name="T1"> </text:span><text:span text:style-name="T2">(65/3) </text:span> ⲛⲁⲩ ⲁⲛ ⲛ̅ⲧⲉⲧ̅ⲛ̅ⲛⲁⲩ ⲁⲛ ⲉⲧⲉ <text:line-break/><text:span text:style-name="T1"> </text:span><text:span text:style-name="T2">(65/4) </text:span> ⲧ̅ⲛ̅ⲙ̅ⲛⲧ̅ⲃ̅ⲗ̅ⲗⲉ ϫⲉ ⲡⲏ ⲉⲧⲉ ⲛⲉⲩ‐ <text:line-break/><text:span text:style-name="T1"> </text:span><text:span text:style-name="T2">(65/5) </text:span> ⲥⲟⲟⲩⲛ ⲙ̅ⲙⲟϥ ⲁⲛ· ⲟⲩⲧⲉ ⲙ̅‐ <text:line-break/><text:span text:style-name="T1"> </text:span><text:span text:style-name="T2">(65/6) </text:span> ⲡⲟⲩⲥⲟⲩⲱⲛ̅ϥ̅ ⲉⲛⲉϩ· ⲟⲩⲧⲉ <text:line-break/><text:soft-page-break/><text:span text:style-name="T1"> </text:span><text:span text:style-name="T2">(65/7) </text:span> ⲙ̅ⲡⲟⲩⲙ̅ⲙⲉ ⲉⲣⲟϥ ⲉⲧⲃⲏⲏⲧ̅ϥ̅· <text:line-break/><text:span text:style-name="T1"> </text:span><text:span text:style-name="T2">(65/8) </text:span> ⲙ̅ⲡⲟⲩⲥⲱⲧ̅ⲙ̅ ⲉⲩⲥⲱⲧ̅ⲙ̅ ⲉϥ‐ <text:line-break/><text:span text:style-name="T1"> </text:span><text:span text:style-name="T2">(65/9) </text:span> ϫⲟⲟⲣ· ⲉⲧⲃⲉ ⲡⲁⲓ̈ ⲁⲩⲣ̅ⲙⲉⲗⲉ <text:line-break/><text:span text:style-name="T1"> </text:span><text:span text:style-name="T2">(65/10) </text:span> ⲧⲁ ϩ̅ⲛ̅ ⲟⲩϩⲁⲡ ⲛ̅ⲧⲉ ⲟⲩⲡⲗⲁⲛⲏ· <text:line-break/><text:span text:style-name="T1"> </text:span><text:span text:style-name="T2">(65/11) </text:span> ⲁⲩⲱ ⲁⲩⲧⲱⲱⲛ ⲛ̅ⲛⲉⲩϭⲓϫ ⲉⲧ‐ <text:line-break/><text:span text:style-name="T1"> </text:span><text:span text:style-name="T2">(65/12) </text:span> ⲥⲟⲟϥ ⲛ̅ⲣⲉϥϩⲱⲧ̅ⲃ̅ ⲉϩⲣⲁⲓ̈ ⲉϫⲱϥ <text:line-break/><text:span text:style-name="T1"> </text:span><text:span text:style-name="T2">(65/13) </text:span> ⲛ̅ⲑⲉ ⲉⲛⲉⲩϩ̅ⲓ̅ⲟⲩⲉ ⲛ̅ⲥⲁ ⲡⲁⲏⲣ· <text:line-break/><text:span text:style-name="T1"> </text:span><text:span text:style-name="T2">(65/14) </text:span> ⲁⲩⲱ ⲛⲓⲁⲧϩⲏⲧ ⲙ̅ⲛ̅ ⲛⲓⲃ̅ⲗ̅ⲗⲉⲉⲩⲉ <text:line-break/><text:span text:style-name="T1"> </text:span><text:span text:style-name="T2">(65/15) </text:span> ⲉⲩⲟ ⲛ̅ⲁⲑⲏⲧ ⲛ̅ⲟⲩⲟⲉⲓϣ ⲛⲓⲙ <text:line-break/><text:span text:style-name="T1"> </text:span><text:span text:style-name="T2">(65/16) </text:span> ⲉⲩⲟ ⲛ̅ϩ̅ⲙ̅ϩⲁⲗ ⲛ̅ⲟⲩⲟⲉⲓϣ ⲛⲓⲙ· <text:line-break/><text:span text:style-name="T1"> </text:span><text:span text:style-name="T2">(65/17) </text:span> ⲛ̅ⲟⲩⲛⲟⲙⲟⲥ ⲙ̅ⲛ̅ ⲟⲩϩⲟⲧⲉ <text:line-break/><text:span text:style-name="T1"> </text:span><text:span text:style-name="T2">(65/18) </text:span> ⲛ̅ⲕⲟⲥⲙⲓⲕⲟⲛ· ⲁⲛⲟⲕ ⲟⲩⲭ̅ⲣ̅ⲥ̅ <text:line-break/><text:span text:style-name="T1"> </text:span><text:span text:style-name="T2">(65/19) </text:span> ⲡϣⲏⲣⲉ ⲛ̅ⲧⲉ ⲡⲣⲱⲙⲉ ⲡⲓⲉⲃⲟⲗ <text:line-break/><text:span text:style-name="T1"> </text:span><text:span text:style-name="T2">(65/20) </text:span> ⲙ̅ⲙⲱⲧ̅ⲛ̅· ⲉⲓ̈ϣⲟⲟⲡ ϩ̅ⲛ̅ ⲧⲏⲛⲉ· <text:line-break/><text:span text:style-name="T1"> </text:span><text:span text:style-name="T2">(65/21) </text:span> ⲉⲩϣⲱⲥ ⲙ̅ⲙⲟⲓ̈ ⲉϫ̅ⲛ̅ ⲧⲏⲛⲉ ϫⲉ <text:line-break/><text:span text:style-name="T1"> </text:span><text:span text:style-name="T2">(65/22) </text:span> ⲕⲁⲁⲥ ⲛ̅ⲧⲱⲧ̅ⲛ̅ ϩⲱⲧⲧⲏⲩⲧ̅ⲛ̅ <text:line-break/><text:span text:style-name="T1"> </text:span><text:span text:style-name="T2">(65/23) </text:span> ⲉⲧⲉⲧⲛⲁⲣ̅ ⲡⲱⲃ̅ϣ̅ ⲙ̅ⲡⲓϣⲓⲃⲉ· <text:line-break/><text:span text:style-name="T1"> </text:span><text:span text:style-name="T2">(65/24) </text:span> ⲁⲩⲱ ⲙ̅ⲡ̅ⲣ̅ϣⲱⲡⲉ ⲛ̅ⲥϩ̅ⲓ̅ⲙⲉ <text:line-break/><text:span text:style-name="T1"> </text:span><text:span text:style-name="T2">(65/25) </text:span> ϫⲉ ⲛⲉⲧⲉⲧ̅ⲛ̅ⲙⲓⲥⲉ ⲛ̅ⲛⲟⲩⲕⲁ‐ <text:line-break/><text:span text:style-name="T1"> </text:span><text:span text:style-name="T2">(65/26) </text:span> ϭⲓⲁ ⲙ̅ⲛ̅ ⲛⲓⲥⲛⲏⲩ· ⲛ̅ⲟⲩⲕⲱϩ <text:line-break/><text:span text:style-name="T1"> </text:span><text:span text:style-name="T2">(65/27) </text:span> ⲙ̅ⲛ̅ ⲟⲩⲡⲱϣⲉ· ⲟⲩϭⲱⲛ̅ⲧ̅ <text:line-break/><text:span text:style-name="T1"> </text:span><text:span text:style-name="T2">(65/28) </text:span> ⲙ̅ⲛ̅ⲛ ⲟⲩⲑⲩⲙⲟⲥ· ⲟⲩϩⲟⲧⲉ <text:line-break/><text:span text:style-name="T1"> </text:span><text:span text:style-name="T2">(65/29) </text:span> ⲙ̅ⲛ̅ ⲟⲩⲡⲱϣ ⲛ̅ϩⲏⲧ· ⲙ̅ⲛ̅ ⲟⲩ‐ <text:line-break/><text:span text:style-name="T1"> </text:span><text:span text:style-name="T2">(65/30) </text:span> ⲉⲡⲓⲑⲩⲙⲓⲁ ⲉⲥϣⲟⲩⲉⲓⲧ ⲉⲥ‐ <text:line-break/><text:span text:style-name="T1"> </text:span><text:span text:style-name="T2">(65/31) </text:span> ϣⲟⲟⲡ ⲁⲛ· ⲁⲛⲟⲕ ⲇⲉ ⲟⲩⲙⲩⲥ‐ <text:line-break/><text:span text:style-name="T1"> </text:span><text:span text:style-name="T2">(65/32) </text:span> ⲧⲏⲣⲓⲟⲛ ⲛⲏⲧ̅ⲛ̅ ⲡⲉ ⲛ̅ⲁⲧϣⲁ‐ <text:line-break/><text:span text:style-name="T1"> </text:span><text:span text:style-name="T2">(65/33) </text:span> ϫⲉ ⲙ̅ⲙⲟϥ· ⲉⲓⲧⲉ ϩⲁⲑⲏ ⲛ̅ⲧ‐ <text:line-break/><text:span text:style-name="T1"> </text:span><text:span text:style-name="T2">(65/34) </text:span> ⲕⲁⲧⲁⲃⲟⲗⲏ ⲛ̅ⲧⲉ ⲡⲕⲟⲥⲙⲟⲥ <text:line-break/><text:span text:style-name="T1"> </text:span><text:span text:style-name="T2">(65/35) </text:span> ⲉⲛⲧⲁⲩⲉⲓ ⲉⲩⲙⲁ ⲛ̅ϭⲓ ⲡⲁϣⲁⲓ̈ <text:line-break/><text:span text:style-name="T1"> </text:span><text:span text:style-name="T2">(65/36) </text:span> ⲧⲏⲣ̅ϥ̅ ⲛ̅ⲧⲉ ϯⲉⲕⲕⲗⲏⲥⲓⲁ ⲉ‐ <text:line-break/><text:span text:style-name="T1"> </text:span><text:span text:style-name="T2">(65/37) </text:span> ϫ̅ⲛ̅ ⲛⲓⲧⲟⲡⲟⲥ ⲛ̅ⲧⲉ ϯⲟⲅⲇⲟⲁⲥ <text:line-break/><text:span text:style-name="T1"> </text:span><text:span text:style-name="T2">(66/1) </text:span> ⲉⲁⲩϣⲟϫⲛⲉ ⲁⲩϫⲓ ϣⲉⲗⲉⲉⲧ <text:line-break/><text:span text:style-name="T1"> </text:span><text:span text:style-name="T2">(66/2) </text:span> ⲙ̅ⲡ̅ⲛ̅ⲓ̅ⲕⲟⲛ ⲉϥϣⲟⲟⲡ ϩ̅ⲛ̅ ⲟⲩϩⲱ <text:line-break/><text:span text:style-name="T1"> </text:span><text:span text:style-name="T2">(66/3) </text:span> ⲧ̅ⲡ̅· ⲁⲩⲱ ⲛ̅ϯϩⲉ ⲁϥϫⲱⲕ ⲉⲃⲟⲗ <text:line-break/><text:span text:style-name="T1"> </text:span><text:span text:style-name="T2">(66/4) </text:span> ϩ̅ⲛ̅ ⲛⲓⲧⲟⲡⲟⲥ ⲛ̅ⲁⲧϣⲁϫⲉ ⲙ̅ⲙⲟ <text:line-break/><text:span text:style-name="T1"> </text:span><text:span text:style-name="T2">(66/5) </text:span> ⲟⲩ ⲉⲃⲟⲗ ϩ̅ⲓ̅ⲧ̅ⲛ̅ ⲟⲩϣⲁϫⲉ ⲉϥⲟⲛ̅ϩ̅ <text:line-break/><text:span text:style-name="T1"> </text:span><text:span text:style-name="T2">(66/6) </text:span> ⲉⲩϫⲱⲕ ⲉⲃⲟⲗ ⲙ̅ⲡⲓϫⲓ ϣⲉⲗⲉⲉⲧ <text:line-break/><text:span text:style-name="T1"> </text:span><text:span text:style-name="T2">(66/7) </text:span> ⲛ̅ⲁⲧϫⲱϩ̅ⲙ̅ ⲉⲃⲟⲗ ϩ̅ⲓ̅ⲧ̅ⲛ̅ ϯⲙⲉ‐ <text:line-break/><text:span text:style-name="T1"> </text:span><text:span text:style-name="T2">(66/8) </text:span> ⲥⲟⲧⲏⲥ ⲛ̅ⲧⲉ ⲓ̅ⲥ̅ ⲉϥϫⲱⲣ̅ϫ̅ ⲙ̅ⲙⲟ‐ <text:line-break/><text:span text:style-name="T1"> </text:span><text:span text:style-name="T2">(66/9) </text:span> ⲟⲩ ⲧⲏⲣⲟⲩ ⲁⲩⲱ ⲉϥⲁⲙⲁϩⲧⲉ <text:line-break/><text:span text:style-name="T1"> </text:span><text:span text:style-name="T2">(66/10) </text:span> ⲙ̅ⲙⲟⲟⲩ· ⲉϥϣⲟⲟⲡ ϩ̅ⲛ̅ ⲟⲩⲱ <text:line-break/><text:span text:style-name="T1"> </text:span><text:span text:style-name="T2">(66/11) </text:span> ϣⲉ ⲛ̅ⲁⲧⲡⲱϣⲉ ⲛ̅ⲧⲉ ⲟⲩϭⲁⲙ· <text:line-break/><text:span text:style-name="T1"> </text:span><text:span text:style-name="T2">(66/12) </text:span> ⲛ̅ⲧⲟϥ ⲇⲉ ⲉϥⲕⲱⲧⲉ ⲉⲣⲟϥ ϣⲁϥ‐ <text:line-break/><text:span text:style-name="T1"> </text:span><text:span text:style-name="T2">(66/13) </text:span> ⲟⲩⲱⲛ̅ϩ̅ ⲉⲃⲟⲗ ⲛⲁϥ ⲉϥϣⲟⲟⲡ ⲛ̅‐ <text:line-break/><text:span text:style-name="T1"> </text:span><text:span text:style-name="T2">(66/14) </text:span> ⲟⲩⲙⲟⲛⲁⲥ ⲛ̅ⲧⲉ ⲛⲁⲓ̈ ⲧⲏⲣⲟⲩ· <text:line-break/><text:span text:style-name="T1"> </text:span><text:span text:style-name="T2">(66/15) </text:span> ⲟⲩⲙⲉⲉⲩⲉ ⲙ̅ⲛ̅ ⲟⲩⲉⲓⲱⲧ· ⲛ̅ⲧⲟϥ‐ <text:line-break/><text:span text:style-name="T1"> </text:span><text:span text:style-name="T2">(66/16) </text:span> ⲉϥϣⲟⲟⲡ ⲛ̅ⲟⲩⲁ· ⲁⲩⲱ ⲉϥⲁϩⲉ <text:line-break/><text:soft-page-break/><text:span text:style-name="T1"> </text:span><text:span text:style-name="T2">(66/17) </text:span> ⲣⲁⲧ̅ϥ̅ ⲛⲁⲩ ⲧⲏⲣⲟⲩ· ⲛ̅ⲧⲟϥ ⲧⲏ‐ <text:line-break/><text:span text:style-name="T1"> </text:span><text:span text:style-name="T2">(66/18) </text:span> ⲣ̅ϥ̅ ⲉⲁϥⲡⲓⲣⲉ ⲉⲃⲟⲗ ⲟⲩⲁⲁϥ· ⲁⲩⲱ <text:line-break/><text:span text:style-name="T1"> </text:span><text:span text:style-name="T2">(66/19) </text:span> ⲉⲩⲱⲛ̅ϩ̅ ⲡⲉ ⲉⲁϥⲉ̅ⲓ̅ ⲉⲃⲟⲗ ϩ̅ⲙ̅ ⲡⲓ‐ <text:line-break/><text:span text:style-name="T1"> </text:span><text:span text:style-name="T2">(66/20) </text:span> ⲱⲧ ⲛ̅ⲧⲉ ϯⲙ̅ⲛ̅ⲧⲙⲉ ⲛ̅ⲁⲧϣⲁ‐ <text:line-break/><text:span text:style-name="T1"> </text:span><text:span text:style-name="T2">(66/21) </text:span> ϫⲉ ⲙ̅ⲙⲟⲥ ⲁⲩⲱ ⲛ̅ⲧⲉⲗⲉⲓⲟⲥ· <text:line-break/><text:span text:style-name="T1"> </text:span><text:span text:style-name="T2">(66/22) </text:span> ⲛ̅ⲧⲉ ⲛⲏ ⲉⲧ̅ⲙ̅ⲡⲓⲙⲁ· ⲡϩⲱⲧ̅ⲡ̅ <text:line-break/><text:span text:style-name="T1"> </text:span><text:span text:style-name="T2">(66/23) </text:span> ⲛ̅ⲧⲉ ϯⲉⲓⲣⲏⲛⲏ· ⲙ̅ⲛ̅ ⲟⲩϣⲃⲏⲣ <text:line-break/><text:span text:style-name="T1"> </text:span><text:span text:style-name="T2">(66/24) </text:span> ⲛ̅ⲧⲉ ϩⲉⲛⲁⲅⲁⲑⲟⲛ· ⲙ̅ⲛ̅ ⲟⲩⲱⲛ̅ϩ̅ <text:line-break/><text:span text:style-name="T1"> </text:span><text:span text:style-name="T2">(66/25) </text:span> ⲛ̅ϣⲁ ⲉⲛⲉϩ ⲙ̅ⲛ̅ ⲟⲩⲧⲉⲗⲏⲗ ⲛ̅‐ <text:line-break/><text:span text:style-name="T1"> </text:span><text:span text:style-name="T2">(66/26) </text:span> ⲁⲧϫⲱϩ̅ⲙ̅· ϩ̅ⲛ̅ ⲟⲩϯ ⲙⲉⲧⲉ ⲉⲛⲁ‐ <text:line-break/><text:span text:style-name="T1"> </text:span><text:span text:style-name="T2">(66/27) </text:span> ϣⲱϥ ⲛ̅ⲧⲉ ⲟⲩⲱⲛ̅ϩ̅ ⲙ̅ⲛ̅ ⲟⲩⲡⲓⲥ‐ <text:line-break/><text:span text:style-name="T1"> </text:span><text:span text:style-name="T2">(66/28) </text:span> ⲧⲓⲥ ⲉⲃⲟⲗ ϩ̅ⲓ̅ⲧ̅ⲛ̅ ⲟⲩⲱⲛ̅ϩ̅ ⲛ̅ϣⲁ‐ <text:line-break/><text:span text:style-name="T1"> </text:span><text:span text:style-name="T2">(66/29) </text:span> ⲉⲛⲉϩ ⲛ̅ⲧⲉ ⲟⲩⲙ̅ⲛ̅ⲧ̅ⲉⲓⲱⲧ· ⲁⲩⲱ <text:line-break/><text:span text:style-name="T1"> </text:span><text:span text:style-name="T2">(66/30) </text:span> ⲟⲩⲙ̅ⲛ̅ⲧ̅ⲙⲁⲁⲩ· ⲙ̅ⲛ̅ ⲟⲩⲙ̅ⲛⲧ̅‐ <text:line-break/><text:span text:style-name="T1"> </text:span><text:span text:style-name="T2">(66/31) </text:span> ⲥⲱⲛⲉ· ⲙ̅ⲛ̅ ⲟⲩⲥⲟⲫⲓⲁ ⲛ̅ⲗⲟⲅⲓ‐ <text:line-break/><text:span text:style-name="T1"> </text:span><text:span text:style-name="T2">(66/32) </text:span> ⲕⲟⲛ· ⲛⲉⲁⲩϯ ⲙⲉⲧⲉ ⲉⲩⲛⲟⲩⲥ <text:line-break/><text:span text:style-name="T1"> </text:span><text:span text:style-name="T2">(66/33) </text:span> ⲉϥⲡⲟⲣ̅ϣ̅ ⲉⲃⲟⲗ· ⲉϥⲛⲁⲡⲱⲣ̅ϣ̅ <text:line-break/><text:span text:style-name="T1"> </text:span><text:span text:style-name="T2">(66/34) </text:span> ⲉⲃⲟⲗ ϩ̅ⲛ̅ ⲟⲩϩⲱⲧ̅ⲡ̅ ⲉϥⲧⲉⲗⲏⲗ <text:line-break/><text:span text:style-name="T1"> </text:span><text:span text:style-name="T2">(66/35) </text:span> ⲙ̅ⲙⲟϥ· ⲁⲩⲱ ⲉϥⲉ ⲛ̅ⲇⲟϭⲓⲙⲟⲥ <text:line-break/><text:span text:style-name="T1"> </text:span><text:span text:style-name="T2">(67/1) </text:span> ⲁⲩⲱ ⲉϥⲥⲱⲧ̅ⲙ̅ ϩ̅ⲛ̅ ⲟⲩⲡⲓⲥⲧⲓⲥ <text:line-break/><text:span text:style-name="T1"> </text:span><text:span text:style-name="T2">(67/2) </text:span> ⲉⲟⲩⲁ· ⲁⲩⲱ ⲡⲁⲓ̈ ⲡⲉ ϩ̅ⲛ̅ ⲟⲩⲙⲛ̅ⲧ̅‐ <text:line-break/><text:span text:style-name="T1"> </text:span><text:span text:style-name="T2">(67/3) </text:span> ⲉⲓⲱⲧ· ⲁⲩⲱ ⲟⲩⲙ̅ⲛ̅ⲧ̅ⲙⲁⲁⲩ <text:line-break/><text:span text:style-name="T1"> </text:span><text:span text:style-name="T2">(67/4) </text:span> ⲙ̅ⲛ̅ ⲟⲩⲙ̅ⲛⲧ̅ⲥⲟⲛ ⲛ̅ⲗⲟⲅⲓⲕⲟⲛ· <text:line-break/><text:span text:style-name="T1"> </text:span><text:span text:style-name="T2">(67/5) </text:span> ⲁⲩⲱ ⲟⲩⲥⲟⲫⲓⲁ· ⲁⲩⲱ ⲡⲁⲓ̈ ⲟⲩ‐ <text:line-break/><text:span text:style-name="T1"> </text:span><text:span text:style-name="T2">(67/6) </text:span> ϫⲓ ϣⲉⲗⲉⲉⲧ ⲡⲉ ⲛ̅ⲧⲉ ϯⲙ̅ⲛ̅ⲧⲙⲉ <text:line-break/><text:span text:style-name="T1"> </text:span><text:span text:style-name="T2">(67/7) </text:span> ⲙ̅ⲛ̅ ⲟⲩⲙ̅ⲧⲟⲛ ⲛ̅ⲧⲉ ⲟⲩⲁⲫⲑⲁⲣ‐ <text:line-break/><text:span text:style-name="T1"> </text:span><text:span text:style-name="T2">(67/8) </text:span> ⲥⲓⲁ· ϩ̅ⲛ̅ ⲟⲩⲡ̅ⲛⲁ̅ ⲛ̅ⲧⲉ ϯⲙ̅ⲛ̅ⲧⲙⲉ <text:line-break/><text:span text:style-name="T1"> </text:span><text:span text:style-name="T2">(67/9) </text:span> ⲛ̅ϩⲣⲁⲓ̈ ϩ̅ⲛ̅ ⲛⲟⲩⲥ ⲛⲓⲙ· ⲙ̅ⲛ̅ ⲟⲩⲟ‐ <text:line-break/><text:span text:style-name="T1"> </text:span><text:span text:style-name="T2">(67/10) </text:span> ⲉⲓⲛ ⲉϥϫⲏⲕ ⲉⲃⲟⲗ ⲛ̅ϩⲣⲁⲓ̈ ϩ̅ⲛ̅ ⲟⲩ‐ <text:line-break/><text:span text:style-name="T1"> </text:span><text:span text:style-name="T2">(67/11) </text:span> ⲙⲩⲥⲧⲏⲣⲓⲟⲛ ⲛ̅ⲁⲧϯ ⲣⲁⲛ ⲉⲣⲟϥ <text:line-break/><text:span text:style-name="T1"> </text:span><text:span text:style-name="T2">(67/12) </text:span> ⲡⲁⲓ̈ ⲇⲉ ⲛ̅ϥ̅ϣⲟⲟⲡ ⲁⲛ· ⲟⲩⲇⲉ ⲛ̅ϥ̅ <text:line-break/><text:span text:style-name="T1"> </text:span><text:span text:style-name="T2">(67/13) </text:span> ⲛⲁϣⲱⲡⲉ ⲁⲛ ⲛ̅ϩⲏⲧ̅ⲛ̅ ⲛ̅ϩⲣⲁⲓ̈ <text:line-break/><text:span text:style-name="T1"> </text:span><text:span text:style-name="T2">(67/14) </text:span> ϩ̅ⲛ̅ ⲗⲁⲁⲩ ⲙ̅ⲙⲉⲣⲟⲥ ⲏ%0 ⲟⲩⲧⲟⲡⲟⲥ <text:line-break/><text:span text:style-name="T1"> </text:span><text:span text:style-name="T2">(67/15) </text:span> ϩ̅ⲛ̅ ⲟⲩⲡⲱϣⲉ ⲙ̅ⲛ̅ ⲟⲩⲡⲱⲣ̅ϫ̅ ⲛ̅‐ <text:line-break/><text:span text:style-name="T1"> </text:span><text:span text:style-name="T2">(67/16) </text:span> ⲧⲉ ⲟⲩⲉⲓⲣⲏⲛⲏ· ⲟⲩϩⲱⲧ̅ⲡ̅ ⲇⲉ ⲙ̅ⲛ̅ <text:line-break/><text:span text:style-name="T1"> </text:span><text:span text:style-name="T2">(67/17) </text:span> ⲟⲩϭⲱⲣ̅ϭ̅ ⲛ̅ⲧⲉ ⲟⲩⲁⲅⲁⲡⲏ· ⲉⲩ‐ <text:line-break/><text:span text:style-name="T1"> </text:span><text:span text:style-name="T2">(67/18) </text:span> ϫⲏⲕ ⲉⲃⲟⲗ ⲧⲏⲣⲟⲩ ϩ̅ⲙ̅ ⲡⲉⲧϣⲟ‐ <text:line-break/><text:span text:style-name="T1"> </text:span><text:span text:style-name="T2">(67/19) </text:span> ⲟⲡ· ⲉⲁⲥϣⲱⲡⲉ ⲟⲛ ϩ̅ⲛ̅ ⲛⲓⲧⲟⲡⲟⲥ <text:line-break/><text:span text:style-name="T1"> </text:span><text:span text:style-name="T2">(67/20) </text:span> ⲉⲧⲥⲁⲡⲉⲥⲏⲧ ⲛ̅ⲧⲡⲉ ⲉⲩϩⲱ‐ <text:line-break/><text:span text:style-name="T1"> </text:span><text:span text:style-name="T2">(67/21) </text:span> ⲧ̅ⲡ̅ ⲛⲁⲩ· ⲛⲏ ⲛ̅ⲧⲁⲩⲥⲟⲩⲱⲛ̅ⲧ̅ <text:line-break/><text:span text:style-name="T1"> </text:span><text:span text:style-name="T2">(67/22) </text:span> ϩ̅ⲛ̅ ⲟⲩⲟⲩϫⲁⲓ̈· ⲙ̅ⲛ̅ ⲟⲩⲙ̅ⲛⲧ̅ⲁⲧ <text:line-break/><text:span text:style-name="T1"> </text:span><text:span text:style-name="T2">(67/23) </text:span> ⲡⲱϣⲉ ⲙ̅ⲛ̅ ⲛⲏ ⲉⲧⲉ ⲛⲉⲩϣⲟ‐ <text:line-break/><text:span text:style-name="T1"> </text:span><text:span text:style-name="T2">(67/24) </text:span> ⲟⲡ ϣⲁ ⲡⲓⲉⲟⲟⲩ ⲛ̅ⲧⲉ ⲡⲓⲱⲧ <text:line-break/><text:span text:style-name="T1"> </text:span><text:span text:style-name="T2">(67/25) </text:span> ⲙ̅ⲛ̅ ϯⲙ̅ⲛ̅ⲧⲙⲉ ⲉⲛⲧⲁⲩⲡⲱ‐ <text:line-break/><text:span text:style-name="T1"> </text:span><text:span text:style-name="T2">(67/26) </text:span> ϣⲉ ⲁⲩϫⲱⲣ̅ϭ̅ ϩ̅ⲙ̅ ⲡⲓⲟⲩⲁ· ⲉⲃⲟⲗ <text:line-break/><text:span text:style-name="T1"> </text:span><text:span text:style-name="T2">(67/27) </text:span> ϩ̅ⲓ̅ⲧⲟⲟⲧ̅ϥ̅ ⲙ̅ⲡⲓϣⲁϫⲉ ⲉⲧⲟⲛ̅ϩ̅ <text:line-break/><text:span text:style-name="T1"> </text:span><text:span text:style-name="T2">(67/28) </text:span> ⲁⲩⲱ ϯϣⲟⲟⲡ ϩ̅ⲙ̅ ⲡⲓⲡ̅ⲛⲁ̅ <text:line-break/><text:soft-page-break/><text:span text:style-name="T1"> </text:span><text:span text:style-name="T2">(67/29) </text:span> ⲙ̅ⲛ̅ ϯⲙ̅ⲛ̅ⲧⲙⲉ· ⲛ̅ⲧⲉ ϯⲙ̅ⲛ̅‐ <text:line-break/><text:span text:style-name="T1"> </text:span><text:span text:style-name="T2">(67/30) </text:span> ⲧⲙⲁⲁⲩ· ⲉⲁϥϣⲱⲡⲉ ⲙ̅ⲡⲓⲙⲁ <text:line-break/><text:span text:style-name="T1"> </text:span><text:span text:style-name="T2">(67/31) </text:span> ⲛ̅ϯϩⲉ· ⲉⲁⲉⲓϣⲱⲡⲉ ϩ̅ⲛ̅ ⲛⲏ <text:line-break/><text:span text:style-name="T1"> </text:span><text:span text:style-name="T2">(67/32) </text:span> ⲉⲧϩⲟⲧ̅ⲡ̅ ϩ̅ⲛ̅ ⲟⲩⲙ̅ⲛⲧ̅ϣⲃⲏⲣ <text:line-break/><text:span text:style-name="T1"> </text:span><text:span text:style-name="T2">(67/33) </text:span> ⲛ̅ⲧⲉ ϩⲉⲛϣⲃⲏⲣ ⲛ̅ⲟⲩⲟⲉⲓϣ <text:line-break/><text:span text:style-name="T1"> </text:span><text:span text:style-name="T2">(67/34) </text:span> ⲛⲓⲙ· ⲟⲩⲇⲉ ⲉⲛⲥⲉⲙ̅ⲙⲉ ⲁⲛ <text:line-break/><text:span text:style-name="T1"> </text:span><text:span text:style-name="T2">(67/35) </text:span> ⲉⲩⲙ̅ⲛ̅ⲧ̅ϫⲁϫⲉ ⲉⲡⲧⲏⲣ̅ϥ̅ <text:line-break/><text:span text:style-name="T1"> </text:span><text:span text:style-name="T2">(67/36) </text:span> ⲟⲩⲇⲉ ⲟⲩⲕⲁϭⲓⲁ· ⲉⲩϩⲟⲧ̅ⲡ̅ ⲇⲉ <text:line-break/><text:span text:style-name="T1"> </text:span><text:span text:style-name="T2">(68/1) </text:span> ⲉⲃⲟⲗ ϩ̅ⲓ̅ⲧⲟⲟⲧ̅ⲥ̅ ⲛ̅ⲧⲁⲅⲛⲱⲥⲓⲥ <text:line-break/><text:span text:style-name="T1"> </text:span><text:span text:style-name="T2">(68/2) </text:span> ϩ̅ⲛ̅ ⲟⲩϣⲁϫⲉ ⲙ̅ⲛ̅ ⲟⲩⲉⲓⲣⲏⲛⲏ <text:line-break/><text:span text:style-name="T1"> </text:span><text:span text:style-name="T2">(68/3) </text:span> ⲉϥϣⲟⲟⲡ ϩ̅ⲛ̅ ⲟⲩⲙ̅ⲛⲧ̅ⲧⲉⲗⲓⲟⲥ <text:line-break/><text:span text:style-name="T1"> </text:span><text:span text:style-name="T2">(68/4) </text:span> ⲙ̅ⲛ̅ ⲟⲩⲟⲛ ⲛⲓⲙ· ⲁⲩⲱ ⲛ̅ϩⲣⲁⲓ̈ ⲛ̅‐ <text:line-break/><text:span text:style-name="T1"> </text:span><text:span text:style-name="T2">(68/5) </text:span> ϩⲏⲧⲟⲩ ⲧⲏⲣⲟⲩ· ⲁⲩⲱ ⲛⲏ ⲛ̅ⲧⲁⲩ‐ <text:line-break/><text:span text:style-name="T1"> </text:span><text:span text:style-name="T2">(68/6) </text:span> ϫⲓ ⲉⲓⲛⲉ ⲙ̅ⲡⲁⲧⲩⲡⲟⲥ ⲉⲩⲛⲁϫⲓ <text:line-break/><text:span text:style-name="T1"> </text:span><text:span text:style-name="T2">(68/7) </text:span> ⲉⲓⲛⲉ ⲙ̅ⲡⲁϣⲁϫⲉ· ⲛⲁⲓ̈ ⲙⲉⲛ ⲉⲩ‐ <text:line-break/><text:span text:style-name="T1"> </text:span><text:span text:style-name="T2">(68/8) </text:span> ⲛⲁⲉⲓ ⲉⲃⲟⲗ ϩ̅ⲛ̅ ⲟⲩⲟⲉⲓⲛ ϣⲁ ⲉⲛⲉϩ· <text:line-break/><text:span text:style-name="T1"> </text:span><text:span text:style-name="T2">(68/9) </text:span> ⲙ̅ⲛ̅ ⲟⲩⲙ̅ⲛⲧ̅ϣⲃⲏⲣ ⲙ̅ⲛ̅ ⲛⲉⲩⲉ‐ <text:line-break/><text:span text:style-name="T1"> </text:span><text:span text:style-name="T2">(68/10) </text:span> ⲣⲏⲩ ϩ̅ⲙ̅ ⲡⲓⲡ̅ⲛⲁ̅· ⲉⲁⲩⲉⲓⲙⲉ ⲛ̅ϩⲣⲁⲓ̈ <text:line-break/><text:span text:style-name="T1"> </text:span><text:span text:style-name="T2">(68/11) </text:span> ϩ̅ⲛ̅ ϩⲱⲃ ⲛⲓⲙ ϩ̅ⲛ̅ ⲟⲩⲙ̅ⲛⲧ̅ⲁⲧⲡⲱ <text:line-break/><text:span text:style-name="T1"> </text:span><text:span text:style-name="T2">(68/12) </text:span> ϣⲉ ϫⲉ ⲟⲩⲁ ⲡⲉⲧϣⲟⲟⲡ· ⲁⲩⲱ <text:line-break/><text:span text:style-name="T1"> </text:span><text:span text:style-name="T2">(68/13) </text:span> ⲛⲁⲓ̈ ⲧⲏⲣⲟⲩ ⲟⲩⲁ ⲛⲉ· ⲁⲩⲱ ⲛ̅ϯ‐ <text:line-break/><text:span text:style-name="T1"> </text:span><text:span text:style-name="T2">(68/14) </text:span> ϩⲉ ⲉⲩⲁϫⲓ ⲥⲃⲱ ⲉⲡⲟⲩⲁ· ⲛ̅ⲑⲉ ⲛ̅‐ <text:line-break/><text:span text:style-name="T1"> </text:span><text:span text:style-name="T2">(68/15) </text:span> ϯⲉⲕⲕⲗⲏⲥⲓⲁ ⲙ̅ⲛ̅ ⲛⲉⲧⲟⲩⲏϩ ⲛ̅‐ <text:line-break/><text:span text:style-name="T1"> </text:span><text:span text:style-name="T2">(68/16) </text:span> ϩⲏⲧ̅ⲥ̅· ϥϣⲟⲟⲡ ⲅⲁⲣ ⲛ̅ϭⲓ ⲡⲓⲱⲧ <text:line-break/><text:span text:style-name="T1"> </text:span><text:span text:style-name="T2">(68/17) </text:span> ⲛ̅ⲛⲁⲓ̈ ⲧⲏⲣⲟⲩ ⲉⲩⲁⲧϯϣⲓ ⲉⲣⲟϥ <text:line-break/><text:span text:style-name="T1"> </text:span><text:span text:style-name="T2">(68/18) </text:span> ⲡⲉ ⲛ̅ⲛⲁⲧϣ̅ⲃ̅ⲧ̅ϥ̅· ⲟⲩⲛⲟⲩⲥ <text:line-break/><text:span text:style-name="T1"> </text:span><text:span text:style-name="T2">(68/19) </text:span> ⲙ̅ⲛ̅ ⲟⲩϣⲁϫⲉ ⲙ̅ⲛ̅ ⲟⲩⲡⲱϣⲉ· <text:line-break/><text:span text:style-name="T1"> </text:span><text:span text:style-name="T2">(68/20) </text:span> ⲙ̅ⲛ̅ ⲟⲩⲕⲱϩ ⲙ̅ⲛ̅ ⲟⲩⲕⲣⲱⲙ· <text:line-break/><text:span text:style-name="T1"> </text:span><text:span text:style-name="T2">(68/21) </text:span> ⲟⲩⲁ ⲇⲉ ⲧⲏⲣ̅ϥ̅ ⲡⲉ ⲉϥϣⲟⲟⲡ ⲙ̅‐ <text:line-break/><text:span text:style-name="T1"> </text:span><text:span text:style-name="T2">(68/22) </text:span> ⲡⲧⲏⲣ̅ϥ̅ ⲛ̅ⲙ̅ⲙⲁⲩ ⲧⲏⲣⲟⲩ ϩ̅ⲛ̅ ⲟⲩ‐ <text:line-break/><text:span text:style-name="T1"> </text:span><text:span text:style-name="T2">(68/23) </text:span> ⲥⲃⲱ ⲛ̅ⲟⲩⲟⲟⲧⲉ· ϫⲉ ⲛⲁⲓ̈ ⲧⲏ‐ <text:line-break/><text:span text:style-name="T1"> </text:span><text:span text:style-name="T2">(68/24) </text:span> ⲣⲟⲩ ⲉⲩϣⲟⲟⲡ ⲉⲃⲟⲗ ϩ̅ⲛ̅ ⲟⲩⲡ̅ⲛⲁ̅ <text:line-break/><text:span text:style-name="T1"> </text:span><text:span text:style-name="T2">(68/25) </text:span> ⲛ̅ⲟⲩⲱⲧ· ⲱ̅ ⲛⲓⲁⲧⲛⲁⲩ· ⲉⲧⲃⲉ <text:line-break/><text:span text:style-name="T1"> </text:span><text:span text:style-name="T2">(68/26) </text:span> ⲟⲩ ⲡⲓⲙⲩⲥⲧⲏⲣⲓⲟⲛ ⲙ̅ⲡⲉⲧ̅ⲛ̅ <text:line-break/><text:span text:style-name="T1"> </text:span><text:span text:style-name="T2">(68/27) </text:span> ⲥⲟⲩⲱⲛ̅ϥ̅ ϩ̅ⲛ̅ ⲟⲩⲙ̅ⲛ̅ⲧⲙⲉ· ⲛ̅‐ <text:line-break/><text:span text:style-name="T1"> </text:span><text:span text:style-name="T2">(68/28) </text:span> ⲧⲁⲩⲣ̅ⲁⲧⲥⲱⲧ̅ⲙ̅ ⲇⲉ ⲛ̅ϭⲓ ⲛⲓⲁⲣⲭⲱⲛ <text:line-break/><text:span text:style-name="T1"> </text:span><text:span text:style-name="T2">(68/29) </text:span> ⲙ̅ⲡⲕⲱⲧⲉ ⲛ̅ⲓ̈ⲁ̅ⲗ̅ⲇ̅ⲁ̅ⲃ̅ⲁ̅ⲱ̅ⲑ̅· ⲉⲧⲃⲉ <text:line-break/><text:span text:style-name="T1"> </text:span><text:span text:style-name="T2">(68/30) </text:span> ϯⲉⲛⲛⲟⲁ ⲛ̅ⲧⲁⲥⲉⲓ ⲉϩⲣⲁⲓ̈ ⲉⲣⲟϥ <text:line-break/><text:span text:style-name="T1"> </text:span><text:span text:style-name="T2">(68/31) </text:span> ⲉⲃⲟⲗ ϩ̅ⲛ̅ ⲧⲉⲥⲥⲱⲛⲉ ϯⲥⲟⲫⲓⲁ· <text:line-break/><text:span text:style-name="T1"> </text:span><text:span text:style-name="T2">(68/32) </text:span> ⲁⲩⲧⲁⲙⲓⲟ ⲛⲁⲩ ⲛ̅ⲟⲩϩⲱⲧ̅ⲡ̅ ⲙⲁⲩ <text:line-break/><text:span text:style-name="T1"> </text:span><text:span text:style-name="T2">(68/33) </text:span> ⲁⲁⲩ· ⲙ̅ⲛ̅ ⲛⲏ ⲉⲧϣⲟⲟⲡ ⲛ̅ⲙ̅ <text:line-break/><text:span text:style-name="T1"> </text:span><text:span text:style-name="T2">(68/34) </text:span> ⲙⲁⲩ ⲛ̅ϩⲣⲁⲓ̈ ϩ̅ⲛ̅ ⲟⲩⲙⲟⲩϫ̅ϭ̅ ⲛ̅ⲧⲉ <text:line-break/><text:span text:style-name="T1"> </text:span><text:span text:style-name="T2">(69/1) </text:span> ⲟⲩⲕⲗⲟⲟⲗⲉ ⲛ̅ⲕⲣⲱⲙ· ⲉⲧⲉ <text:line-break/><text:span text:style-name="T1"> </text:span><text:span text:style-name="T2">(69/2) </text:span> ⲛⲉⲩⲕⲱϩ ⲡⲉ ⲙ̅ⲛ̅ ⲡⲕⲉⲥⲉⲉⲡⲉ <text:line-break/><text:span text:style-name="T1"> </text:span><text:span text:style-name="T2">(69/3) </text:span> ⲛ̅ⲧⲁⲩⲛ̅ⲧⲟⲩ ⲉⲃⲟⲗ· ⲉⲃⲟⲗ ϩ̅ⲓ̅ⲧⲟ‐ <text:line-break/><text:span text:style-name="T1"> </text:span><text:span text:style-name="T2">(69/4) </text:span> ⲟⲧⲟⲩ ⲛ̅ⲛⲉⲩⲡⲗⲁⲥⲙⲁ· ϩⲱⲥ <text:line-break/><text:span text:style-name="T1"> </text:span><text:span text:style-name="T2">(69/5) </text:span> ⲉⲁⲩⲟⲩⲱϣ̅ⲙ̅ ⲛ̅ϯϩⲏⲇⲟⲛⲏ ⲛ̅‐ <text:line-break/><text:soft-page-break/><text:span text:style-name="T1"> </text:span><text:span text:style-name="T2">(69/6) </text:span> ⲉⲩⲅⲉⲛⲏⲥ ⲛ̅ⲧⲉ ϯⲉⲕⲕⲗⲏⲥⲓⲁ· <text:line-break/><text:span text:style-name="T1"> </text:span><text:span text:style-name="T2">(69/7) </text:span> ⲁⲩⲱ ⲉⲧⲃⲉ ⲡⲁⲓ̈ ⲁⲩⲟⲩⲱⲛ̅ϩ̅ ⲉ‐ <text:line-break/><text:span text:style-name="T1"> </text:span><text:span text:style-name="T2">(69/8) </text:span> ⲃⲟⲗ ⲛ̅ⲛⲟⲩⲙⲟⲩϫ̅ϭ̅ ⲛ̅ⲛⲟⲩⲙ̅ⲛⲧ̅ <text:line-break/><text:span text:style-name="T1"> </text:span><text:span text:style-name="T2">(69/9) </text:span> ⲁⲧⲥⲟⲟⲩⲛ ϩ̅ⲛ̅ ⲟⲩⲡⲁⲣⲁ ⲡϣⲱ‐ <text:line-break/><text:span text:style-name="T1"> </text:span><text:span text:style-name="T2">(69/10) </text:span> ⲗ̅ϩ̅ ⲛ̅ⲧⲉ ⲟⲩⲕⲣⲱⲙ· ⲙ̅ⲛ̅ ⲟⲩ‐ <text:line-break/><text:span text:style-name="T1"> </text:span><text:span text:style-name="T2">(69/11) </text:span> ⲕⲁϩ ⲙ̅ⲛ̅ ⲟⲩⲣⲉϥϩⲱⲧ̅ⲃ̅· ⲉϩⲉⲛ‐ <text:line-break/><text:span text:style-name="T1"> </text:span><text:span text:style-name="T2">(69/12) </text:span> ⲕⲟⲩⲉⲓ ⲛⲉ ⲁⲩⲱ ⲛ̅ⲁⲧⲥⲃⲱ· <text:line-break/><text:span text:style-name="T1"> </text:span><text:span text:style-name="T2">(69/13) </text:span> ⲉⲛⲥⲉⲥⲟⲟⲩⲛ ⲁⲛ ⲉⲁⲩⲣ̅ⲧⲟⲗ <text:line-break/><text:span text:style-name="T1"> </text:span><text:span text:style-name="T2">(69/14) </text:span> ⲙⲁ ⲉⲛⲁⲓ̈· ⲁⲩⲱ ⲉⲙⲡⲟⲩⲉⲓⲙⲉ <text:line-break/><text:span text:style-name="T1"> </text:span><text:span text:style-name="T2">(69/15) </text:span> ϫⲉ ϣⲁⲣⲉⲟⲩⲟⲉⲓⲛ ⲣ̅ⲕⲟⲓⲛⲱ <text:line-break/><text:span text:style-name="T1"> </text:span><text:span text:style-name="T2">(69/16) </text:span> ⲛⲓ ⲉⲩⲟⲩⲟⲉⲓⲛ· ⲁⲩⲱ ⲟⲩⲕⲁ‐ <text:line-break/><text:span text:style-name="T1"> </text:span><text:span text:style-name="T2">(69/17) </text:span> ⲕⲉ ⲙ̅ⲛ̅ ⲟⲩⲕⲁⲕⲉ· ⲁⲩⲱ ⲡⲉⲧ‐ <text:line-break/><text:span text:style-name="T1"> </text:span><text:span text:style-name="T2">(69/18) </text:span> ϫⲁϩ̅ⲙ̅· ⲙ̅ⲛ̅ ⲡⲏ ⲉⲧⲧⲁⲕⲏⲟⲩⲧ· <text:line-break/><text:span text:style-name="T1"> </text:span><text:span text:style-name="T2">(69/19) </text:span> ⲁⲩⲱ ⲡⲓⲁⲧⲧⲁⲕⲟ ⲙ̅ⲛ̅ ⲡⲓⲁⲧϫⲱ <text:line-break/><text:span text:style-name="T1"> </text:span><text:span text:style-name="T2">(69/20) </text:span> ϩ̅ⲙ̅· ⲛⲁⲓ̈ ⲇⲉ ⲁⲉⲓⲧⲁⲁⲩ ⲛⲏⲧ̅ⲛ̅ <text:line-break/><text:span text:style-name="T1"> </text:span><text:span text:style-name="T2">(69/21) </text:span> ⲁⲛⲟⲕ ⲓ̅ⲥ̅ ⲡⲉⲭⲣ̅ⲥ̅ ⲡϣⲏⲣⲉ ⲙ̅‐ <text:line-break/><text:span text:style-name="T1"> </text:span><text:span text:style-name="T2">(69/22) </text:span> ⲡⲣⲱⲙⲉ ⲉⲧϫⲟⲥⲉ ⲁⲛⲡⲏⲩⲉ· <text:line-break/><text:span text:style-name="T1"> </text:span><text:span text:style-name="T2">(69/23) </text:span> ⲱ̅ ⲛⲓⲧⲉⲗⲓⲟⲥ ⲁⲩⲱ ⲛⲓⲁⲧϫⲱ <text:line-break/><text:span text:style-name="T1"> </text:span><text:span text:style-name="T2">(69/24) </text:span> ϩ̅ⲙ̅· ⲉⲧⲃⲉ ⲡⲓⲙⲩⲥⲧⲏⲣⲓⲟⲛ ⲛ̅‐ <text:line-break/><text:span text:style-name="T1"> </text:span><text:span text:style-name="T2">(69/25) </text:span> ⲁⲧϫⲱϩ̅ⲙ̅ ⲁⲩⲱ ⲛ̅ⲧⲉⲗⲓⲟⲥ· <text:line-break/><text:span text:style-name="T1"> </text:span><text:span text:style-name="T2">(69/26) </text:span> ⲙ̅ⲛ̅ ⲡⲓⲁⲣⲣⲏⲧⲟⲛ· ⲉⲩⲙⲉⲉⲩⲉ <text:line-break/><text:span text:style-name="T1"> </text:span><text:span text:style-name="T2">(69/27) </text:span> ⲇⲉ ϫⲉ ⲛ̅ⲧⲁⲛⲣ̅ⲇⲟⲅⲙⲁⲧⲓⲍⲉ <text:line-break/><text:span text:style-name="T1"> </text:span><text:span text:style-name="T2">(69/28) </text:span> ⲙ̅ⲙⲟⲟⲩ ϩⲁⲑⲏ ⲛ̅ⲧⲕⲁⲧⲁⲃⲟⲗⲏ <text:line-break/><text:span text:style-name="T1"> </text:span><text:span text:style-name="T2">(69/29) </text:span> ⲛ̅ⲧⲉ ⲡⲕⲟⲥⲙⲟⲥ· ϫⲉⲕⲁⲁⲥ ⲉⲛ‐ <text:line-break/><text:span text:style-name="T1"> </text:span><text:span text:style-name="T2">(69/30) </text:span> ϣⲁⲛⲉ̅ⲓ̅ ⲉⲃⲟⲗ ϩ̅ⲛ̅ ⲛⲓⲧⲟⲡⲟⲥ ⲛ̅‐ <text:line-break/><text:span text:style-name="T1"> </text:span><text:span text:style-name="T2">(69/31) </text:span> ⲧⲉ ⲡⲕⲟⲥⲙⲟⲥ ϫⲉ ⲉⲛⲁϯ ⲛ̅ⲛⲓ‐ <text:line-break/><text:span text:style-name="T1"> </text:span><text:span text:style-name="T2">(69/32) </text:span> ⲥⲩⲙⲃⲟⲗⲟⲛ ⲙ̅ⲙⲁⲩ ⲛ̅ⲧⲉ <text:line-break/><text:span text:style-name="T1"> </text:span><text:span text:style-name="T2">(69/33) </text:span> ϯⲁⲫⲑⲁⲣⲥⲓⲁ ⲉⲃⲟⲗ ϩ̅ⲙ̅ ⲡⲓϩⲱ‐ <text:line-break/><text:span text:style-name="T1"> </text:span><text:span text:style-name="T2">(69/34) </text:span> ⲧ̅ⲡ̅ ⲙ̅ⲡ̅ⲛⲓ̅ⲕⲟⲛ ⲡⲣⲟⲥ ⲟⲩⲥⲟ‐ <text:line-break/><text:span text:style-name="T1"> </text:span><text:span text:style-name="T2">(70/1) </text:span> ⲟⲩⲛ· ⲛ̅ⲧⲱⲧ̅ⲛ̅ ⲧⲉⲧ̅ⲛ̅ⲥⲟⲟⲩⲛ <text:line-break/><text:span text:style-name="T1"> </text:span><text:span text:style-name="T2">(70/2) </text:span> ⲙ̅ⲙⲟϥ ⲁⲛ· ϫⲉ ϯⲕⲗⲟⲟⲗⲉ ⲛ̅ⲥⲁⲣ‐ <text:line-break/><text:span text:style-name="T1"> </text:span><text:span text:style-name="T2">(70/3) </text:span> ⲕⲓⲕⲟⲛ ⲣ̅ϩⲁⲉⲓⲃⲉ ⲉⲣⲱⲧ̅ⲛ̅· ⲁⲛⲟⲕ <text:line-break/><text:span text:style-name="T1"> </text:span><text:span text:style-name="T2">(70/4) </text:span> ⲇⲉ ⲡⲉ ⲡⲓϣⲃⲏⲣ ⲛ̅ⲧⲉ ϯⲥⲟⲫⲓⲁ ⲟⲩ‐ <text:line-break/><text:span text:style-name="T1"> </text:span><text:span text:style-name="T2">(70/5) </text:span> ⲁⲉⲉⲧ· ⲁⲛⲟⲕ ⲁⲉⲓϣⲱⲡⲉ ϩ̅ⲛ̅ ⲕⲟⲩ‐ <text:line-break/><text:span text:style-name="T1"> </text:span><text:span text:style-name="T2">(70/6) </text:span> ⲛ̅ϥ̅ ⲙ̅ⲡⲓⲱⲧ ϫⲓⲛ ⲛ̅ϣⲟⲣ̅ⲡ̅ ϩ̅ⲙ̅ ⲡⲙⲁ‐ <text:line-break/><text:span text:style-name="T1"> </text:span><text:span text:style-name="T2">(70/7) </text:span> ⲛ̅ⲛ̅ϣⲏⲣⲉ ⲛ̅ⲧⲉ ϯⲙ̅ⲛ̅ⲧⲙⲉ· ⲁⲩⲱ <text:line-break/><text:span text:style-name="T1"> </text:span><text:span text:style-name="T2">(70/8) </text:span> ϯⲙ̅ⲛ̅ⲧⲛⲟϭ· ⲙ̅ⲧⲟⲛ ϭⲉ ⲛ̅ⲙ̅ⲙⲁⲓ̈ <text:line-break/><text:span text:style-name="T1"> </text:span><text:span text:style-name="T2">(70/9) </text:span> ⲛⲁϣⲃⲏⲣ ⲙ̅ⲡ̅ⲛ̅ⲁ̅ ⲙ̅ⲛ̅ ⲛⲁⲥⲛⲏ <text:line-break/><text:span text:style-name="T1"> </text:span><text:span text:style-name="T2">(70/10) </text:span> ⲟⲩ ⲛ̅ϣⲁ ⲉⲛⲉϩ· <text:line-break/><text:span text:style-name="T1"> </text:span><text:span text:style-name="T2">(70/11) </text:span> ⲇⲉⲩⲧⲉⲣⲟⲥ ⲗⲟⲅⲟⲥ <text:line-break/><text:span text:style-name="T1"> </text:span><text:span text:style-name="T2">(70/12) </text:span> ⲧⲟⲩ ⲙⲉⲅⲁⲗⲟⲩ ⲥⲏⲑ </text:p>
      <text:p text:style-name="P1"/>
      <text:p text:style-name="P3">( codex VII ) The Apocalypse of Peter</text:p>
      <text:p text:style-name="P2"><text:span text:style-name="T1"> </text:span><text:span text:style-name="T2">(70/13) </text:span> ⲁⲡⲟⲕⲁⲗⲩⲯⲓⲥ ⲡⲉⲧⲣⲟⲩ <text:line-break/><text:span text:style-name="T1"> </text:span><text:span text:style-name="T2">(70/14) </text:span> ⲉϥϩⲙⲟⲟⲥ ⲛ̅ϭⲓ ⲡⲥ̅ⲱ̅ⲣ̅ ⲛ̅ϩⲣⲁⲓ̈ ϩ̅ⲙ̅ <text:line-break/><text:span text:style-name="T1"> </text:span><text:span text:style-name="T2">(70/15) </text:span> ⲡⲓⲣ̅ⲡⲉ ⲛ̅ϩⲣⲁⲓ̈ ϩ̅ⲛ̅ ϯⲙⲉϩⲧ̅ ⲛ̅ⲧⲉ <text:line-break/><text:span text:style-name="T1"> </text:span><text:span text:style-name="T2">(70/16) </text:span> ⲡⲓⲥ̅ⲙ̅ⲛⲉ· ⲙ̅ⲛ̅ ⲡⲓϯ ⲙⲁⲧⲉ ⲛ̅‐ <text:line-break/><text:span text:style-name="T1"> </text:span><text:span text:style-name="T2">(70/17) </text:span> ⲧⲉ ⲡⲓⲙⲁϩⲙⲏⲧ ⲛ̅ⲥⲧⲩⲗⲟⲥ· ⲁⲩⲱ <text:line-break/><text:span text:style-name="T1"> </text:span><text:span text:style-name="T2">(70/18) </text:span> ⲉϥⲙⲟⲧ̅ⲛ̅ ⲙ̅ⲙⲟϥ ϩ̅ⲓ̅ϫ̅ⲛ̅ ϯⲏⲡⲉ <text:line-break/><text:span text:style-name="T1"> </text:span><text:span text:style-name="T2">(70/19) </text:span> ⲛ̅ⲧⲉ ϯⲙ̅ⲛ̅ⲧⲛⲟϭ ⲉⲧⲟⲛ̅ϩ̅· ⲛ̅‐ <text:line-break/><text:span text:style-name="T1"> </text:span><text:span text:style-name="T2">(70/20) </text:span> ⲁⲧϫⲱϩ̅ⲙ̅· ⲡⲉϫⲁϥ ⲛⲁⲓ̈ ϫⲉ ⲡⲉ‐ <text:line-break/><text:span text:style-name="T1"> </text:span><text:span text:style-name="T2">(70/21) </text:span> ⲧⲣⲉ ⲥⲉⲥⲙⲁⲙⲁⲁⲧ ⲛ̅ϭⲓ ⲛⲁⲡⲓ‐ <text:line-break/><text:span text:style-name="T1"> </text:span><text:span text:style-name="T2">(70/22) </text:span> ⲱⲧ· ⲉⲩⲥⲁⲧⲡⲉ ⲛ̅ⲛⲓⲡⲏⲩⲉ· <text:line-break/><text:span text:style-name="T1"> </text:span><text:span text:style-name="T2">(70/23) </text:span> ⲡⲏ ⲉⲧⲁϥⲟⲩⲱⲛ̅ϩ̅ ⲉⲃⲟⲗ ⲙ̅ⲡⲓ‐ <text:line-break/><text:span text:style-name="T1"> </text:span><text:span text:style-name="T2">(70/24) </text:span> ⲱⲛ̅ϩ̅ ⲛ̅ⲛⲓⲉⲃⲟⲗ ϩ̅ⲙ̅ ⲡⲱⲛ̅ϩ̅ ⲉⲃⲟⲗ <text:line-break/><text:span text:style-name="T1"> </text:span><text:span text:style-name="T2">(70/25) </text:span> ϩ̅ⲓ̅ⲧⲟⲟⲧ ⲉⲁⲉⲓϯ ⲙⲉⲉⲩⲉ· ⲉ‐ <text:line-break/><text:span text:style-name="T1"> </text:span><text:span text:style-name="T2">(70/26) </text:span> ⲧⲉ ⲛ̅ⲧⲟⲟⲩ ⲡⲉⲧⲟⲩⲕⲱⲧ ⲙ̅‐ <text:line-break/><text:span text:style-name="T1"> </text:span><text:span text:style-name="T2">(70/27) </text:span> ⲙⲟⲟⲩ ⲛ̅ϩⲣⲁⲓ̈ ϩ̅ⲙ̅ ⲡⲏ ⲉⲧϫⲟⲟⲣ· <text:line-break/><text:span text:style-name="T1"> </text:span><text:span text:style-name="T2">(70/28) </text:span> ϫⲉ ⲉⲩⲉⲥⲱⲧ̅ⲙ̅ ⲉⲡⲁϣⲁϫⲉ <text:line-break/><text:span text:style-name="T1"> </text:span><text:span text:style-name="T2">(70/29) </text:span> ⲁⲩⲱ ⲉⲩⲉⲥⲟⲩⲱⲛ ϩⲉⲛϣⲁ‐ <text:line-break/><text:span text:style-name="T1"> </text:span><text:span text:style-name="T2">(70/30) </text:span> ϫⲉ ⲛ̅ⲧⲉ ϯⲁⲇⲓⲕⲓⲁ· ⲙ̅ⲛ̅ ⲟⲩⲙ̅ⲛⲧ̅‐ <text:line-break/><text:span text:style-name="T1"> </text:span><text:span text:style-name="T2">(70/31) </text:span> ⲡⲁⲣⲁⲛⲟⲙⲟⲥ ⲛ̅ⲧⲉ ⲟⲩⲛⲟⲙⲟ̣[ⲥ] <text:line-break/><text:span text:style-name="T1"> </text:span><text:span text:style-name="T2">(70/32) </text:span> ⲁⲩⲱ ⲟⲩⲇⲓⲕⲁⲓⲟⲥⲩⲛⲏ· ϩ̣ⲱ̣ⲥ̣ <text:line-break/><text:span text:style-name="T1"> </text:span><text:span text:style-name="T2">(71/1) </text:span> ⲉⲩϣⲟⲟⲡ ⲉⲃⲟⲗ ϩ̅ⲙ̅ ⲡϫⲓⲥⲉ ⲛ̅‐ <text:line-break/><text:span text:style-name="T1"> </text:span><text:span text:style-name="T2">(71/2) </text:span> ϣⲁϫⲉ ⲛⲓⲙ ⲛ̅ⲧⲉ ⲡⲉⲓ̈ⲡⲗⲏⲣⲱ <text:line-break/><text:span text:style-name="T1"> </text:span><text:span text:style-name="T2">(71/3) </text:span> ⲙⲁ ⲛ̅ⲧⲉ ϯⲙ̅ⲛ̅ⲧⲙⲉ· ⲉⲁⲩϫⲓ‐ <text:line-break/><text:span text:style-name="T1"> </text:span><text:span text:style-name="T2">(71/4) </text:span> ⲟⲩⲟⲉⲓⲛ ϩ̅ⲛ̅ ⲟⲩϯ ⲙⲉⲧⲉ· ⲉⲃⲟⲗ <text:line-break/><text:span text:style-name="T1"> </text:span><text:span text:style-name="T2">(71/5) </text:span> ϩ̅ⲓ̅ⲧ̅ⲙ̅ ⲡⲏ ⲉⲧⲟⲩⲕⲱⲧⲉ ⲛ̅ⲥⲱϥ <text:line-break/><text:span text:style-name="T1"> </text:span><text:span text:style-name="T2">(71/6) </text:span> ⲛ̅ϭⲓ ⲛⲓⲁⲣⲭⲏ· ⲁⲩⲱ ⲉⲙⲡⲟⲩ <text:line-break/><text:span text:style-name="T1"> </text:span><text:span text:style-name="T2">(71/7) </text:span> ϭ̅ⲛ̅ⲧ̅ϥ̅· ⲟⲩⲇⲉ ⲙ̅ⲡⲟⲩϣⲁϫⲉ ⲙ̅‐ <text:line-break/><text:span text:style-name="T1"> </text:span><text:span text:style-name="T2">(71/8) </text:span> ⲙⲟϥ ϩⲁⲧ̅ⲛ̅ ⲥⲡⲉⲣⲙⲁ ⲛⲓⲙ ⲛ̅‐ <text:line-break/><text:span text:style-name="T1"> </text:span><text:span text:style-name="T2">(71/9) </text:span> ⲧⲉ ⲛⲓⲡⲣⲟⲫⲏⲧⲏⲥ· ⲉⲁϥⲟⲩⲱ <text:line-break/><text:span text:style-name="T1"> </text:span><text:span text:style-name="T2">(71/10) </text:span> ⲛ̅ϩ̅ ⲉⲃⲟⲗ ϯⲛⲟⲩ ⲛ̅ϩⲣⲁⲓ̈ ϩ̅ⲛ̅ ⲛⲁⲓ̈ <text:line-break/><text:span text:style-name="T1"> </text:span><text:span text:style-name="T2">(71/11) </text:span> ⲛⲁⲓ̈· ⲛ̅ϩⲣⲁⲓ̈ ϩ̅ⲙ̅ ⲡⲉⲧⲟⲩⲟⲛ̅ϩ̅ ⲉ‐ <text:line-break/><text:span text:style-name="T1"> </text:span><text:span text:style-name="T2">(71/12) </text:span> ⲧⲉ ⲡⲓϣⲏⲣⲉ ⲡⲉ ⲛ̅ⲧⲉ ⲡⲣⲱⲙⲉ <text:line-break/><text:span text:style-name="T1"> </text:span><text:span text:style-name="T2">(71/13) </text:span> ⲉⲧϫⲟⲥⲉ ⲉⲛⲓⲡⲏⲩⲉ ⲛ̅ϩⲣⲁⲓ̈ ϩ̅ⲛ̅ <text:line-break/><text:span text:style-name="T1"> </text:span><text:span text:style-name="T2">(71/14) </text:span> ⲟⲩϩⲟⲧⲉ ⲛ̅ⲧⲉ ⲛⲓⲣⲱⲙⲉ ⲛ̅ϣⲃⲏⲣ <text:line-break/><text:span text:style-name="T1"> </text:span><text:span text:style-name="T2">(71/15) </text:span> ⲛ̅ⲟⲩⲥⲓⲁ· ⲛ̅ⲧⲟⲕ ⲇⲉ ϩⲱⲱⲕ ⲡⲉ‐ <text:line-break/><text:span text:style-name="T1"> </text:span><text:span text:style-name="T2">(71/16) </text:span> ⲧⲣⲉ ϣⲱⲡⲉ ⲉⲕⲉ ⲛ̅ⲧⲉⲗⲓⲟⲥ ⲛ̅‐ <text:line-break/><text:span text:style-name="T1"> </text:span><text:span text:style-name="T2">(71/17) </text:span> ϩⲣⲁⲓ̈ ϩ̅ⲙ̅ ⲡⲉⲕⲣⲁⲛ ⲛ̅ⲙ̅ⲙⲁⲓ̈ ϩⲱ <text:line-break/><text:span text:style-name="T1"> </text:span><text:span text:style-name="T2">(71/18) </text:span> ⲡⲏ ⲉⲧⲁϥⲥⲱⲧ̅ⲡ̅ ⲙ̅ⲙⲟⲕ· ϫⲉ <text:line-break/><text:span text:style-name="T1"> </text:span><text:span text:style-name="T2">(71/19) </text:span> ⲉⲃⲟⲗ ⲙ̅ⲙⲟⲕ ⲁⲓ̈ⲉⲓⲣⲉ ⲛ̅ⲟⲩⲁⲣ‐ <text:line-break/><text:span text:style-name="T1"> </text:span><text:span text:style-name="T2">(71/20) </text:span> ⲭⲏ ⲙ̅ⲡⲓⲕⲉⲥⲉⲉⲡⲉ ⲉⲧⲁⲓ̈ⲧⲁ <text:line-break/><text:span text:style-name="T1"> </text:span><text:span text:style-name="T2">(71/21) </text:span> ϩⲙⲟⲩ ⲉϩⲟⲩⲛ ⲉⲩⲥⲟⲟⲩⲛ· <text:line-break/><text:span text:style-name="T1"> </text:span><text:span text:style-name="T2">(71/22) </text:span> ϩⲱⲥⲧⲉ 〈ⲉ〉ϭ̅ⲙ̅ϭⲟⲙ ϣⲁⲛⲧⲉ ⲡⲓⲁⲛ‐ <text:line-break/><text:span text:style-name="T1"> </text:span><text:span text:style-name="T2">(71/23) </text:span> ⲧⲓⲙⲓⲙⲟⲛ ⲛ̅ⲧⲉ ϯⲇⲓⲕⲁⲓⲟⲥⲩ‐ <text:line-break/><text:span text:style-name="T1"> </text:span><text:span text:style-name="T2">(71/24) </text:span> ⲛⲏ ⲛ̅ⲧⲉ ⲡⲏ ⲉⲧⲁϥⲣ̅ ϣⲟⲣ̅ⲡ̅ ⲛ̅ⲧⲱ‐ <text:line-break/><text:span text:style-name="T1"> </text:span><text:span text:style-name="T2">(71/25) </text:span> ϩ̅ⲙ̅ ⲙ̅ⲙⲟⲕ· ⲉⲁϥⲧⲁϩⲙⲉⲕ ϫⲉ <text:line-break/><text:span text:style-name="T1"> </text:span><text:span text:style-name="T2">(71/26) </text:span> ⲉⲕⲉⲥⲟⲩⲱⲛ̅ϥ̅ ⲛ̅ⲑⲉ ⲉⲧⲉⲥⲙ̅‐ <text:line-break/><text:span text:style-name="T1"> </text:span><text:span text:style-name="T2">(71/27) </text:span> ⲡϣⲁ ⲛ̅ⲁⲁⲥ· ⲉⲧⲃⲉ ϯⲁⲡⲟⲭⲏ <text:line-break/><text:soft-page-break/><text:span text:style-name="T1"> </text:span><text:span text:style-name="T2">(71/28) </text:span> ⲉⲧⲡⲏϩ ⲉⲣⲟϥ· ⲙ̅ⲛ̅ ⲛⲓⲙⲟⲩⲧ <text:line-break/><text:span text:style-name="T1"> </text:span><text:span text:style-name="T2">(71/29) </text:span> ⲛ̅ⲧⲉ ⲛⲉϥϭⲓϫ· ⲁⲩⲱ ⲛⲉϥⲟⲩ‐ <text:line-break/><text:span text:style-name="T1"> </text:span><text:span text:style-name="T2">(71/30) </text:span> ⲉⲣⲏⲧⲉ· ⲙ̅ⲛ̅ ⲡⲓϯ ⲕⲗⲟⲙ ⲉ‐ <text:line-break/><text:span text:style-name="T1"> </text:span><text:span text:style-name="T2">(71/31) </text:span> ⲃⲟⲗ ϩ̅ⲓ̅ⲧ̅ⲛ̅ ⲛⲏ ⲛ̅ⲧⲉ ϯⲙⲉⲥⲟ‐ <text:line-break/><text:span text:style-name="T1"> </text:span><text:span text:style-name="T2">(71/32) </text:span> ⲧⲏⲥ ⲙ̅ⲛ̅ ⲡⲓⲥⲱⲙⲁ ⲛ̅ⲧⲉ ⲡ̅ⲣ̅‐ <text:line-break/><text:span text:style-name="T1"> </text:span><text:span text:style-name="T2">(71/33) </text:span> [ⲟ]ⲩ̣ⲟⲉⲓⲛ ⲛ̅ⲧ̣ⲁϥ· ⲉⲩⲉⲓⲛⲉ ⲙ̅‐ <text:line-break/><text:span text:style-name="T1"> </text:span><text:span text:style-name="T2">(71/34) </text:span> [ⲙ]ⲟ̣ϥ ϩ̅ⲛ̣̅̅ ⲟ̣ⲩϩⲉⲗⲡⲓⲥ ⲛ̅ⲧⲉ <text:line-break/><text:span text:style-name="T1"> </text:span><text:span text:style-name="T2">(72/1) </text:span> ⲟⲩⲇⲓⲁⲕⲟⲛⲓⲁ ⲉⲧⲃⲉ ⲟⲩⲃⲉⲕⲉ <text:line-break/><text:span text:style-name="T1"> </text:span><text:span text:style-name="T2">(72/2) </text:span> ⲛ̅ⲧⲉ ⲟⲩⲧⲁⲉⲓⲟ· ϩⲱⲥ ⲉϥⲛⲁⲥⲟ‐ <text:line-break/><text:span text:style-name="T1"> </text:span><text:span text:style-name="T2">(72/3) </text:span> ⲟϩⲉ ⲙ̅ⲙⲟⲕ ⲛ̅ϣⲟⲙ̅ⲧ̅ ⲛ̅ⲥⲟⲡ‐ <text:line-break/><text:span text:style-name="T1"> </text:span><text:span text:style-name="T2">(72/4) </text:span> ϩ̅ⲛ̅ ⲧⲉⲓ̈ⲟⲩϣⲏ· ⲛⲁⲓ̈ ⲇⲉ ⲉϥϫⲱ <text:line-break/><text:span text:style-name="T1"> </text:span><text:span text:style-name="T2">(72/5) </text:span> ⲙ̅ⲙⲟⲟⲩ ⲁⲉⲓⲛⲁⲩ ⲉⲛⲟⲩⲏⲏⲃ <text:line-break/><text:span text:style-name="T1"> </text:span><text:span text:style-name="T2">(72/6) </text:span> ⲙ̅ⲛ̅ ⲡⲓⲗⲁⲟⲥ ⲉϥⲡⲏⲧ ⲉϩⲣⲁⲓ̈ ⲉ‐ <text:line-break/><text:span text:style-name="T1"> </text:span><text:span text:style-name="T2">(72/7) </text:span> ϫⲱⲛ ⲙ̅ⲛ̅ ϩⲉⲛⲱⲛⲉ ϩⲱⲥ ⲉⲩ‐ <text:line-break/><text:span text:style-name="T1"> </text:span><text:span text:style-name="T2">(72/8) </text:span> ⲛⲁϩⲟⲧ̅ⲃ̅ⲛ̅· ⲁⲛⲟⲕ ⲇⲉ ⲁⲉⲓϣⲧⲟⲣ‐ <text:line-break/><text:span text:style-name="T1"> </text:span><text:span text:style-name="T2">(72/9) </text:span> ⲧ̅ⲣ̅ ϫⲉ ⲛ̅ⲛⲉⲛⲙⲟⲩ· ⲁⲩⲱ ⲡⲉ‐ <text:line-break/><text:span text:style-name="T1"> </text:span><text:span text:style-name="T2">(72/10) </text:span> ϫⲁϥ ⲛⲁⲓ̈ ϫⲉ ⲡⲉⲧⲣⲉ ⲁⲉⲓϫⲟⲟⲥ <text:line-break/><text:span text:style-name="T1"> </text:span><text:span text:style-name="T2">(72/11) </text:span> ⲛⲁⲕ ⲛ̅ⲟⲩⲙⲏⲏϣⲉ ⲛ̅ⲥⲟⲡ ϫⲉ <text:line-break/><text:span text:style-name="T1"> </text:span><text:span text:style-name="T2">(72/12) </text:span> ϩⲉⲛⲃ̅ⲗ̅ⲗⲉⲉⲩⲉ ⲛⲉ ⲉⲙ̅ⲛ̅ ϫⲁⲩ <text:line-break/><text:span text:style-name="T1"> </text:span><text:span text:style-name="T2">(72/13) </text:span> ⲙⲟⲉⲓⲧ ⲛ̅ⲧⲁⲩ· ⲉϣϫⲉ ⲕⲟⲩ‐ <text:line-break/><text:span text:style-name="T1"> </text:span><text:span text:style-name="T2">(72/14) </text:span> ⲱϣ ⲉⲥⲟⲩⲱⲛ ⲧⲉⲩⲙ̅ⲛ̅ⲧ̅‐ <text:line-break/><text:span text:style-name="T1"> </text:span><text:span text:style-name="T2">(72/15) </text:span> ⲃ̅ⲗ̅ⲗⲉ ⲕⲱ ⲛ̅ⲛⲉⲕϭⲓϫ ϩ̅ⲓ̅ⲣ̅ⲛ̅ ⲛⲓⲃⲁⲗ ⲙ̅‐ <text:line-break/><text:span text:style-name="T1"> </text:span><text:span text:style-name="T2">(72/16) </text:span> ⲡⲓⲡⲟⲇⲏⲣⲏ ⲛ̅ⲧⲁⲕ· ⲁⲩⲱ ⲁϫⲓⲥ ϫⲉ <text:line-break/><text:span text:style-name="T1"> </text:span><text:span text:style-name="T2">(72/17) </text:span> ⲟⲩ ⲡⲉⲧ̅ⲕ̅ⲛⲁⲩ ⲉⲣⲟϥ· ⲁⲛⲟⲕ <text:line-break/><text:span text:style-name="T1"> </text:span><text:span text:style-name="T2">(72/18) </text:span> ⲇⲉ ⲛ̅ⲧⲁⲣⲓⲁⲁⲥ ⲙ̅ⲡⲓⲛⲁⲩ ⲉⲗⲁ‐ <text:line-break/><text:span text:style-name="T1"> </text:span><text:span text:style-name="T2">(72/19) </text:span> ⲁⲩ· ⲁⲉⲓϫⲟⲟⲥ ϫⲉ ⲙ̅ⲙ̅ⲛ̅ⲗⲁⲁⲩ <text:line-break/><text:span text:style-name="T1"> </text:span><text:span text:style-name="T2">(72/20) </text:span> ⲛⲁⲩ· ⲡⲁⲗⲓⲛ ⲡⲉϫⲁϥ ⲛⲁⲓ̈ ϫⲉ <text:line-break/><text:span text:style-name="T1"> </text:span><text:span text:style-name="T2">(72/21) </text:span> ⲁⲣⲓ ⲡⲁⲓ̈ ⲟⲛ· ⲁⲩⲱ ⲁⲥϣⲱⲡⲉ <text:line-break/><text:span text:style-name="T1"> </text:span><text:span text:style-name="T2">(72/22) </text:span> ⲙ̅ⲙⲟⲓ̈ ⲛ̅ϭⲓ ⲟⲩϩⲟⲧⲉ 〈ⲙ̅]̅2̅ⲛ̅ ⲟⲩ‐ <text:line-break/><text:span text:style-name="T1"> </text:span><text:span text:style-name="T2">(72/23) </text:span> ⲣⲁϣⲉ· ⲁⲉⲓⲛⲁⲩ ⲅⲁⲣ ⲉⲩⲟⲩ‐ <text:line-break/><text:span text:style-name="T1"> </text:span><text:span text:style-name="T2">(72/24) </text:span> ⲟⲉⲓⲛ ⲃ̅ⲃ̅ⲣ̅ⲣⲉ ⲉⲛⲉⲁϥ ⲉⲡⲟⲩⲟ‐ <text:line-break/><text:span text:style-name="T1"> </text:span><text:span text:style-name="T2">(72/25) </text:span> ⲉⲓⲛ ⲛ̅ⲧⲉ ⲡⲉϩⲟⲟⲩ· ⲙ̅ⲙ̅ⲛ̅ <text:line-break/><text:span text:style-name="T1"> </text:span><text:span text:style-name="T2">(72/26) </text:span> ⲛ̅ⲥⲱⲥ ⲁϥⲉ̅ⲓ̅ ⲉϩⲣⲁⲓ̈ ⲉϫ̅ⲙ̅ ⲡⲥⲱ‐ <text:line-break/><text:span text:style-name="T1"> </text:span><text:span text:style-name="T2">(72/27) </text:span> ⲧⲏⲣ· ⲁⲩⲱ ⲁⲉⲓⲧⲁⲙⲟϥ ⲉⲛⲏ‐ <text:line-break/><text:span text:style-name="T1"> </text:span><text:span text:style-name="T2">(72/28) </text:span> ⲉⲧⲁⲉⲓⲛⲁⲩ ⲉⲣⲟⲟⲩ· ⲁⲩⲱ <text:line-break/><text:span text:style-name="T1"> </text:span><text:span text:style-name="T2">(72/29) </text:span> ⲡⲉϫⲁϥ ⲛⲁⲓ̈ ⲟⲛ ϫⲉ ⲧⲱⲱⲛ <text:line-break/><text:span text:style-name="T1"> </text:span><text:span text:style-name="T2">(72/30) </text:span> ⲛ̅ⲛⲉⲕϭⲓϫ ⲉϩⲣⲁⲓ̈· ⲁⲩⲱ ⲥⲱ‐ <text:line-break/><text:span text:style-name="T1"> </text:span><text:span text:style-name="T2">(72/31) </text:span> ⲧ̅ⲙ̅ ⲉⲡⲏ ⲉⲧⲟⲩϫⲱ ⲙ̅ⲙⲟϥ̣ [ⲛ̅]‐ <text:line-break/><text:span text:style-name="T1"> </text:span><text:span text:style-name="T2">(73/1) </text:span> ϭⲓ ⲛⲓⲟⲩⲏⲏⲃ ⲙ̅ⲛ̅ ⲛⲓⲗⲁⲟⲥ· ⲁⲩⲱ <text:line-break/><text:span text:style-name="T1"> </text:span><text:span text:style-name="T2">(73/2) </text:span> ⲁⲉⲓⲥⲱⲧ̅ⲙ̅ ⲉⲛⲓⲟⲩⲏⲏⲃ ⲉⲩϩⲙⲟ‐ <text:line-break/><text:span text:style-name="T1"> </text:span><text:span text:style-name="T2">(73/3) </text:span> ⲟⲥ ⲙ̅ⲛ̅ ⲛⲓⲥⲁϩ· ⲛⲉⲣⲉⲛⲓⲙⲏⲏϣⲉ <text:line-break/><text:span text:style-name="T1"> </text:span><text:span text:style-name="T2">(73/4) </text:span> ⲱϣ ⲉⲃⲟⲗ ϩ̅ⲛ̅ ⲧⲟⲩⲥⲙⲏ· ⲉⲧⲁϥ <text:line-break/><text:span text:style-name="T1"> </text:span><text:span text:style-name="T2">(73/5) </text:span> ⲥⲱⲧ̅ⲙ̅ ⲉⲛⲁⲓ̈ ⲉⲃⲟⲗ ϩ̅ⲓ̅ⲧⲟⲟⲧ ⲡⲉ <text:line-break/><text:span text:style-name="T1"> </text:span><text:span text:style-name="T2">(73/6) </text:span> ϫⲁϥ ⲛⲁⲓ̈ ϫⲉ ⲧⲱⲱⲛ ⲛ̅ⲛⲓⲙⲁⲁ <text:line-break/><text:span text:style-name="T1"> </text:span><text:span text:style-name="T2">(73/7) </text:span> ϫⲉ ⲛ̅ⲧⲉ ⲧⲉⲕⲁⲡⲉ· ⲁⲩⲱ ⲥⲱ‐ <text:line-break/><text:span text:style-name="T1"> </text:span><text:span text:style-name="T2">(73/8) </text:span> ⲧ̅ⲙ̅ ⲉⲛⲏ ⲉⲧⲟⲩϫⲱ ⲙ̅ⲙⲟⲟⲩ <text:line-break/><text:span text:style-name="T1"> </text:span><text:span text:style-name="T2">(73/9) </text:span> ⲁⲩⲱ ⲁⲉⲓⲥⲱⲧ̅ⲙ̅ ⲟⲛ ⲉⲕϩⲙⲟ‐ <text:line-break/><text:soft-page-break/><text:span text:style-name="T1"> </text:span><text:span text:style-name="T2">(73/10) </text:span> ⲟⲥ ⲉⲩϯ ⲉⲟⲟⲩ ⲛⲁⲕ· ⲁⲩⲱ <text:line-break/><text:span text:style-name="T1"> </text:span><text:span text:style-name="T2">(73/11) </text:span> ⲛⲁⲓ̈ ⲉⲓ̈ϫⲱ ⲙ̅ⲙⲟⲟⲩ ⲡⲉϫⲉ ⲡⲥⲱ‐ <text:line-break/><text:span text:style-name="T1"> </text:span><text:span text:style-name="T2">(73/12) </text:span> ⲧⲏⲣ ϫⲉ ⲁⲉⲓϫⲟⲟⲥ ⲛⲁⲕ ϫⲉ ⲛⲁⲓ̈ <text:line-break/><text:span text:style-name="T1"> </text:span><text:span text:style-name="T2">(73/13) </text:span> ϩⲉⲛⲃ̅ⲗ̅ⲗⲉⲉⲩⲉ ⲛⲉ ⲁⲩⲱ ϩⲉⲛ‐ <text:line-break/><text:span text:style-name="T1"> </text:span><text:span text:style-name="T2">(73/14) </text:span> ⲕⲟⲩⲣ ⲛⲉ· ⲥⲱⲧ̅ⲙ̅ ϭⲉ ϯⲛⲟⲩ‐ <text:line-break/><text:span text:style-name="T1"> </text:span><text:span text:style-name="T2">(73/15) </text:span> ⲉⲛⲏ ⲉⲧⲟⲩϫⲱ ⲙ̅ⲙⲟⲟⲩ ⲛⲁⲕ <text:line-break/><text:span text:style-name="T1"> </text:span><text:span text:style-name="T2">(73/16) </text:span> ϩ̅ⲛ̅ ⲟⲩⲙⲩⲥⲧⲏⲣⲓⲟⲛ· ⲁⲩⲱ ⲁ‐ <text:line-break/><text:span text:style-name="T1"> </text:span><text:span text:style-name="T2">(73/17) </text:span> ⲣⲉϩ ⲉⲣⲟⲟⲩ ⲙ̅ⲡ̅ⲣ̅ϫⲟⲟⲩ ⲉⲛⲓ <text:line-break/><text:span text:style-name="T1"> </text:span><text:span text:style-name="T2">(73/18) </text:span> ϣⲏⲣⲉ ⲛ̅ⲧⲉ ⲡⲓⲁⲓⲱⲛ· ⲉⲕⲉ‐ <text:line-break/><text:span text:style-name="T1"> </text:span><text:span text:style-name="T2">(73/19) </text:span> ϣⲱⲡⲉ ⲅⲁⲣ ⲛ̅ⲧⲟⲕ ⲉⲩϫⲉ ⲟⲩⲁ· <text:line-break/><text:span text:style-name="T1"> </text:span><text:span text:style-name="T2">(73/20) </text:span> ⲉⲣⲟⲕ ⲛ̅ϩⲣⲁⲓ̈ ϩ̅ⲛ̅ ⲛⲉⲓ̈ⲁⲓⲱⲛ· ⲉⲩ‐ <text:line-break/><text:span text:style-name="T1"> </text:span><text:span text:style-name="T2">(73/21) </text:span> ⲉ ⲛ̅ⲛⲁⲧⲥⲟⲟⲩⲛ ⲉⲣⲟⲕ· ⲉⲩ‐ <text:line-break/><text:span text:style-name="T1"> </text:span><text:span text:style-name="T2">(73/22) </text:span> ϯ ⲉⲟⲟⲩ ⲇⲉ ⲛⲁⲕ ϩ̅ⲛ̅ ⲟⲩⲅⲛⲱ‐ <text:line-break/><text:span text:style-name="T1"> </text:span><text:span text:style-name="T2">(73/23) </text:span> ⲥⲓⲥ· ⲟⲩⲛ̅ ⲟⲩⲙⲏⲏϣⲉ ⲅⲁⲣ <text:line-break/><text:span text:style-name="T1"> </text:span><text:span text:style-name="T2">(73/24) </text:span> ⲛⲁϫⲓ ⲉⲃⲟⲗ ϩ̅ⲛ̅ ϯⲁⲣⲭⲏ ⲛ̅ⲧⲉ <text:line-break/><text:span text:style-name="T1"> </text:span><text:span text:style-name="T2">(73/25) </text:span> ⲡⲉⲛϣⲁϫⲉ· ⲁⲩⲱ ⲥⲉⲛⲁⲕⲟ‐ <text:line-break/><text:span text:style-name="T1"> </text:span><text:span text:style-name="T2">(73/26) </text:span> ⲧⲟⲩ ⲉⲣⲟⲟⲩ ⲟⲛ ϩ̅ⲙ̅ ⲡⲟⲩⲱϣ <text:line-break/><text:span text:style-name="T1"> </text:span><text:span text:style-name="T2">(73/27) </text:span> ⲛ̅ⲧⲉ ⲡⲓⲱⲧ ⲛ̅ⲧⲉ ⲧⲟⲩⲡⲗⲁ‐ <text:line-break/><text:span text:style-name="T1"> </text:span><text:span text:style-name="T2">(73/28) </text:span> ⲛⲏ ϫⲉ ⲁⲩⲉⲓⲣⲉ ⲙ̅ⲡⲉⲧⲉ ⲛⲁϥ <text:line-break/><text:span text:style-name="T1"> </text:span><text:span text:style-name="T2">(73/29) </text:span> ⲁⲩⲱ ϥⲛⲁⲟⲩⲟⲛϩⲟⲩ ⲉⲃⲟⲗ ⲛ̅‐ <text:line-break/><text:span text:style-name="T1"> </text:span><text:span text:style-name="T2">(73/30) </text:span> ϩⲣⲁⲓ̈ ϩ̅ⲙ̅ ⲡⲉϥϩⲁⲡ· ⲉⲧⲉ ⲡⲁⲓ̈ <text:line-break/><text:span text:style-name="T1"> </text:span><text:span text:style-name="T2">(73/31) </text:span> ⲡⲉ ⲛⲓⲣⲉϥϣ̅ⲙ̅ϣⲉ ⲛ̅ⲧⲉ ⲡϣⲁ‐ <text:line-break/><text:span text:style-name="T1"> </text:span><text:span text:style-name="T2">(73/32) </text:span> ϫⲉ· ⲛⲏ ⲇⲉ ⲉⲧⲁⲩϣⲱⲡⲉ ⲉⲩ‐ <text:line-break/><text:span text:style-name="T1"> </text:span><text:span text:style-name="T2">(74/1) </text:span> ⲙⲟϫ̅ϭ̅ ⲙ̅ⲛ̅ ⲛⲁⲓ̈· ⲉⲩⲉϣⲱⲡⲉ <text:line-break/><text:span text:style-name="T1"> </text:span><text:span text:style-name="T2">(74/2) </text:span> ⲛ̅ⲁⲓⲭⲙⲁⲗⲱⲧⲟⲥ ⲛ̅ⲧⲟⲟⲧⲟⲩ <text:line-break/><text:span text:style-name="T1"> </text:span><text:span text:style-name="T2">(74/3) </text:span> ⲉⲩⲉ ⲛ̅ⲁⲛⲉⲥⲑⲏⲧⲟⲛ· ⲡⲓⲁⲕⲉ‐ <text:line-break/><text:span text:style-name="T1"> </text:span><text:span text:style-name="T2">(74/4) </text:span> ⲣⲁⲓⲟⲛ ⲇⲉ ⲛ̅ⲁⲧⲕⲣⲟϥ ⲛ̅ⲛⲁⲅⲁ‐ <text:line-break/><text:span text:style-name="T1"> </text:span><text:span text:style-name="T2">(74/5) </text:span> ⲑⲟⲛ· ⲉⲩⲧⲱϭ̅ⲛ̅ ⲙ̅ⲙⲟϥ ⲉϩⲣⲁⲓ̈ <text:line-break/><text:span text:style-name="T1"> </text:span><text:span text:style-name="T2">(74/6) </text:span> ⲉⲡⲓⲣⲉϥⲣ̅ ϩⲱⲃ ⲛ̅ⲧⲉ ⲡⲙⲟⲩ· <text:line-break/><text:span text:style-name="T1"> </text:span><text:span text:style-name="T2">(74/7) </text:span> ⲁⲩⲱ ϣⲁ ϩⲣⲁⲓ̈ ⲉϯⲙ̅ⲛ̅ⲧ̅ⲣ̅ⲣⲟ ⲛ̅‐ <text:line-break/><text:span text:style-name="T1"> </text:span><text:span text:style-name="T2">(74/8) </text:span> ⲧⲉ ⲛⲁⲓ̈ ⲉⲩϯ ⲉⲟⲟⲩ ⲙ̅ⲡⲓⲭ̅ⲥ̅· ⲛ̅‐ <text:line-break/><text:span text:style-name="T1"> </text:span><text:span text:style-name="T2">(74/9) </text:span> ϩⲣⲁⲓ̈ ϩ̅ⲛ̅ ⲟⲩⲁⲡⲟⲕⲁⲧⲁⲥⲧⲁⲥⲓⲥ· <text:line-break/><text:span text:style-name="T1"> </text:span><text:span text:style-name="T2">(74/10) </text:span> ⲁⲩⲱ ⲉⲩϯ ⲉⲟⲟⲩ ⲛ̅ⲛⲓⲣⲱⲙⲉ <text:line-break/><text:span text:style-name="T1"> </text:span><text:span text:style-name="T2">(74/11) </text:span> ⲛ̅ⲧⲉ ⲡⲓⲕⲱ ⲉϩⲣⲁⲓ̈ ⲙ̅ⲙ̅ⲛ̅ⲧ̅ⲛⲟⲩϫ‐ <text:line-break/><text:span text:style-name="T1"> </text:span><text:span text:style-name="T2">(74/12) </text:span> ⲛⲏ ⲉⲧⲛⲁϣⲱⲡⲉ ⲙ̅ⲙ̅ⲛ̅ⲛ̅ⲥⲱⲕ· <text:line-break/><text:span text:style-name="T1"> </text:span><text:span text:style-name="T2">(74/13) </text:span> ⲁⲩⲱ ⲉⲩⲛⲁⲧⲱϭⲉ ⲉϩⲣⲁⲓ̈ ⲉⲡⲣⲁⲛ <text:line-break/><text:span text:style-name="T1"> </text:span><text:span text:style-name="T2">(74/14) </text:span> ⲛ̅ⲧⲉ ⲟⲩⲣⲉϥⲙⲟⲟⲩⲧ· ⲉⲩⲙⲉ‐ <text:line-break/><text:span text:style-name="T1"> </text:span><text:span text:style-name="T2">(74/15) </text:span> ⲉⲩⲉ ϫⲉ ⲉⲩⲛⲁⲧ̅ⲃ̅ⲃⲟ· ⲁⲩⲱ ⲉⲩ‐ <text:line-break/><text:span text:style-name="T1"> </text:span><text:span text:style-name="T2">(74/16) </text:span> ⲛⲁⲧⲱⲗ̅ⲙ̅ ⲛ̅ϩⲟⲩⲟ· ⲁⲩⲱ ⲛ̅ⲥⲉ‐ <text:line-break/><text:span text:style-name="T1"> </text:span><text:span text:style-name="T2">(74/17) </text:span> ϩⲉ ⲉϩⲣⲁⲓ̈ ⲉⲩⲣⲁⲛ ⲛ̅ⲧⲉ ϯⲡⲗⲁⲛⲏ <text:line-break/><text:span text:style-name="T1"> </text:span><text:span text:style-name="T2">(74/18) </text:span> ⲁⲩⲱ ⲉⲧⲟⲟⲧ̅ϥ̅ ⲛ̅ⲟⲩⲣⲉϥⲣ̅ ⲧⲉ‐ <text:line-break/><text:span text:style-name="T1"> </text:span><text:span text:style-name="T2">(74/19) </text:span> ⲭⲛⲏ ⲉϥϩⲟⲟⲩ· ⲙ̅ⲛ̅ ⲟⲩⲇⲟⲅⲙⲁ <text:line-break/><text:span text:style-name="T1"> </text:span><text:span text:style-name="T2">(74/20) </text:span> ⲛ̅ⲟⲩⲙⲏⲏϣⲉ ⲙ̅ⲙⲟⲣⲫⲏ· ⲉⲩ‐ <text:line-break/><text:span text:style-name="T1"> </text:span><text:span text:style-name="T2">(74/21) </text:span> ⲣ̅ⲁⲣⲭⲉⲓ ⲉϫⲱⲟⲩ ϩ̅ⲛ̅ ⲟⲩⲙ̅ⲛⲧ̅ <text:line-break/><text:span text:style-name="T1"> </text:span><text:span text:style-name="T2">(74/22) </text:span> ϩⲉⲣⲉⲥⲓⲥ· ϩⲉⲛϩⲟⲉⲓⲛⲉ ⲅⲁⲣ <text:line-break/><text:span text:style-name="T1"> </text:span><text:span text:style-name="T2">(74/23) </text:span> ⲉⲃⲟⲗ ⲛ̅ϩⲏⲧⲟⲩ ⲉⲩⲛⲁϣⲱⲡⲉ <text:line-break/><text:span text:style-name="T1"> </text:span><text:span text:style-name="T2">(74/24) </text:span> ⲉⲩϫⲉ ⲟⲩⲁ ⲉϯⲙ̅ⲛ̅ⲧⲙⲉ· ⲁⲩⲱ <text:line-break/><text:soft-page-break/><text:span text:style-name="T1"> </text:span><text:span text:style-name="T2">(74/25) </text:span> ⲉⲩϫⲉ ϣⲁϫⲉ ⲉϥϩⲟⲟⲩ· ⲁⲩⲱ <text:line-break/><text:span text:style-name="T1"> </text:span><text:span text:style-name="T2">(74/26) </text:span> ⲥⲉⲛⲁϫⲱ ⲛ̅ϩⲉⲛⲡⲉⲧϩⲟⲟⲩ <text:line-break/><text:span text:style-name="T1"> </text:span><text:span text:style-name="T2">(74/27) </text:span> ⲉⲛⲉⲩ ⲉⲣⲏⲩ· ϩⲉⲛϩⲟⲉⲓⲛⲉ <text:line-break/><text:span text:style-name="T1"> </text:span><text:span text:style-name="T2">(74/28) </text:span> ⲙⲉⲛ ⲥⲉⲛⲁϯ ⲣⲁⲛ ⲉⲣⲟⲟⲩ ϫⲉ <text:line-break/><text:span text:style-name="T1"> </text:span><text:span text:style-name="T2">(74/29) </text:span> ⲉⲩⲁϩⲉⲣⲁⲧⲟⲩ ϩ̅ⲛ̅ ⲟⲩϭⲟⲙ ⲛ̅‐ <text:line-break/><text:span text:style-name="T1"> </text:span><text:span text:style-name="T2">(74/30) </text:span> ⲧⲉ ⲛⲓⲁⲣⲭⲱⲛ· ⲛ̅ⲧⲉ ⲟⲩⲣⲱ‐ <text:line-break/><text:span text:style-name="T1"> </text:span><text:span text:style-name="T2">(74/31) </text:span> ⲙⲉ ⲙ̅ⲛ̅ ⲟⲩⲥϩ̅ⲓ̅ⲙⲉ ⲉⲥⲕⲏⲕ ⲁ‐ <text:line-break/><text:span text:style-name="T1"> </text:span><text:span text:style-name="T2">(74/32) </text:span> ϩⲏⲟⲩ ⲉⲥⲉ ⲛ̅ⲟⲩⲙⲏⲏϣⲉ <text:line-break/><text:span text:style-name="T1"> </text:span><text:span text:style-name="T2">(74/33) </text:span> ⲙ̅ⲙⲟⲣⲫⲏ ⲙ̅ⲛ̅ ⲟⲩⲙⲏⲏϣⲉ <text:line-break/><text:span text:style-name="T1"> </text:span><text:span text:style-name="T2">(74/34) </text:span> ⲛ̅ⲛ̅ⲙ̅ⲕⲁϩ· ⲁⲩⲱ ⲉⲩⲉϣⲱ <text:line-break/><text:span text:style-name="T1"> </text:span><text:span text:style-name="T2">(75/1) </text:span> ⲡⲉ ⲛ̅ϭⲓ ⲛⲏ ⲉⲧϫⲱ ⲛ̅ⲛⲁⲓ̈ ⲉⲩϣⲓ‐ <text:line-break/><text:span text:style-name="T1"> </text:span><text:span text:style-name="T2">(75/2) </text:span> ⲛⲉ ⲉⲧⲃⲉ ϩⲉⲛⲣⲁⲥⲟⲩ· ⲕⲁⲛ ⲉⲩ‐ <text:line-break/><text:span text:style-name="T1"> </text:span><text:span text:style-name="T2">(75/3) </text:span> ϣⲁⲛϫⲟⲟⲥ ϫⲉ ⲟⲩⲣⲁⲥⲟⲩ ⲁⲥ‐ <text:line-break/><text:span text:style-name="T1"> </text:span><text:span text:style-name="T2">(75/4) </text:span> ⲉ̅ⲓ̅ ⲉⲃⲟⲗ ϩ̅ⲛ̅ ⲟⲩⲇⲁⲓ̈ⲙⲱⲛ ⲉϥ‐ <text:line-break/><text:span text:style-name="T1"> </text:span><text:span text:style-name="T2">(75/5) </text:span> ⲙ̅ⲡϣⲁ ⲛ̅ⲧⲉⲩⲡⲗⲁⲛⲏ· ⲧⲟⲧⲉ <text:line-break/><text:span text:style-name="T1"> </text:span><text:span text:style-name="T2">(75/6) </text:span> ⲉⲩⲉϯ ⲛⲁⲩ ⲙ̅ⲡⲓⲧⲁⲕⲟ ⲉⲡⲙⲁ <text:line-break/><text:span text:style-name="T1"> </text:span><text:span text:style-name="T2">(75/7) </text:span> ⲛ̅ϯⲁⲫⲑⲁⲣⲥⲓⲁ· ⲡⲓⲕⲁⲕⲟⲛ ⲅⲁⲣ <text:line-break/><text:span text:style-name="T1"> </text:span><text:span text:style-name="T2">(75/8) </text:span> ⲙ̅ⲙ̅ⲛ̅ ϣϭⲟⲙ ⲛ̅ϥ̅ϯ ⲛ̅ⲟⲩⲕⲁⲣ‐ <text:line-break/><text:span text:style-name="T1"> </text:span><text:span text:style-name="T2">(75/9) </text:span> ⲡⲟⲥ ⲛ̅ⲁⲅⲁⲑⲟⲛ· ⲡⲟⲩⲁ ⲅⲁⲣ ⲡⲟⲩ‐ <text:line-break/><text:span text:style-name="T1"> </text:span><text:span text:style-name="T2">(75/10) </text:span> ⲁ ⲡⲓⲙⲁ ⲉⲧⲉ ⲟⲩⲉⲃⲟⲗ ⲙ̅ⲙⲟⲟⲩ‐ <text:line-break/><text:span text:style-name="T1"> </text:span><text:span text:style-name="T2">(75/11) </text:span> ⲡⲉ ϣⲁϥϯ ⲙ̅ⲡⲏ ⲉⲧⲉⲓⲛⲉ ⲙ̅ⲙⲟϥ· <text:line-break/><text:span text:style-name="T1"> </text:span><text:span text:style-name="T2">(75/12) </text:span> ⲟⲩⲧⲉ ⲅⲁⲣ ⲯⲩⲭⲏ ⲛⲓⲙ ⲛ̅ϩⲉⲛ <text:line-break/><text:span text:style-name="T1"> </text:span><text:span text:style-name="T2">(75/13) </text:span> ⲉⲃⲟⲗ ϩ̅ⲛ̅ ϯⲙ̅ⲛ̅ⲧⲙⲉ ⲁⲛ ⲛⲉ· ⲟⲩ‐ <text:line-break/><text:span text:style-name="T1"> </text:span><text:span text:style-name="T2">(75/14) </text:span> ⲧⲉ ⲉⲃⲟⲗ ϩ̅ⲛ̅ ϯⲙ̅ⲛⲧ̅ⲁⲧⲙⲟⲩ· <text:line-break/><text:span text:style-name="T1"> </text:span><text:span text:style-name="T2">(75/15) </text:span> ⲯⲩⲭⲏ ⲅⲁⲣ ⲛⲓⲙ ⲛ̅ⲧⲉ ⲛⲉⲓ̈ⲁⲓⲱⲛ <text:line-break/><text:span text:style-name="T1"> </text:span><text:span text:style-name="T2">(75/16) </text:span> ⲟⲩⲙⲟⲩ ⲡⲉⲧⲟⲩⲏⲡ ⲉⲣⲟ〈ⲟⲩ〉 ⲛ̅‐ <text:line-break/><text:span text:style-name="T1"> </text:span><text:span text:style-name="T2">(75/17) </text:span> ⲛⲁϩⲣⲁⲛ· ⲕⲁⲑⲟⲧⲓ ϫⲉ ⲟⲩⲣⲉϥ <text:line-break/><text:span text:style-name="T1"> </text:span><text:span text:style-name="T2">(75/18) </text:span> ϣ̅ⲙ̅ϣⲉ ⲧⲉ ⲛ̅ⲟⲩⲟⲉⲓϣ ⲛⲓⲙ· <text:line-break/><text:span text:style-name="T1"> </text:span><text:span text:style-name="T2">(75/19) </text:span> ⲉⲩⲧⲁⲙⲓⲟ ⲙ̅ⲙⲟⲥ ⲛ̅ⲛⲓⲉⲡⲓ‐ <text:line-break/><text:span text:style-name="T1"> </text:span><text:span text:style-name="T2">(75/20) </text:span> ⲑⲩⲙⲓⲁ ⲛ̅ⲧⲁⲥ· ⲙ̅ⲛ̅ ⲟⲩⲧⲁⲕⲟ <text:line-break/><text:span text:style-name="T1"> </text:span><text:span text:style-name="T2">(75/21) </text:span> ⲛ̅ϣⲁ ⲉⲛⲉϩ ⲛ̅ⲧⲁⲩ ⲉⲧⲉ ⲡⲉ‐ <text:line-break/><text:span text:style-name="T1"> </text:span><text:span text:style-name="T2">(75/22) </text:span> ⲧⲟⲩϣⲟⲟⲡ ⲙ̅ⲙⲟϥ ⲡⲉ· ⲁⲩⲱ <text:line-break/><text:span text:style-name="T1"> </text:span><text:span text:style-name="T2">(75/23) </text:span> ⲡⲏ ⲉⲧⲟⲩϣⲟⲟⲡ ⲉⲃⲟⲗ ⲛ̅ϩⲏ‐ <text:line-break/><text:span text:style-name="T1"> </text:span><text:span text:style-name="T2">(75/24) </text:span> ⲧ̅ϥ̅ ⲉⲩⲣ̅ⲁⲅⲁⲡⲁ ⲛ̅ⲛⲓⲥⲱⲛ̅ⲧ̅ ⲛ̅‐ <text:line-break/><text:span text:style-name="T1"> </text:span><text:span text:style-name="T2">(75/25) </text:span> ⲧⲉ ϯϩⲩⲗⲏ ⲉⲧⲁⲥⲡⲓⲣⲉ ⲉⲃⲟⲗ <text:line-break/><text:span text:style-name="T1"> </text:span><text:span text:style-name="T2">(75/26) </text:span> ⲛ̅ⲙ̅ⲙⲁⲩ· ⲛ̅ⲥⲉⲉⲓⲛⲉ ⲇⲉ ⲛ̅ⲛⲁⲓ̈ <text:line-break/><text:span text:style-name="T1"> </text:span><text:span text:style-name="T2">(75/27) </text:span> ⲁⲛ ⲱ ⲡⲉⲧⲣⲉ ⲛ̅ϭⲓ ⲛⲓⲯⲩⲭⲏ ⲛ̅‐ <text:line-break/><text:span text:style-name="T1"> </text:span><text:span text:style-name="T2">(75/28) </text:span> ⲁⲧⲙⲟⲩ· ⲁⲗⲗⲁ ⲉⲫⲟⲥⲟⲛ ⲙⲉⲛ <text:line-break/><text:span text:style-name="T1"> </text:span><text:span text:style-name="T2">(75/29) </text:span> ⲉⲥϣⲟⲟⲡ ⲛ̅ϩⲣⲁⲓ̈ ϩ̅ⲛ̅ ⲟⲩⲉⲓ ⲁⲛ <text:line-break/><text:span text:style-name="T1"> </text:span><text:span text:style-name="T2">(75/30) </text:span> ⲛ̅ϭⲓ ϯⲟⲩⲛⲟⲩ· ⲉⲥⲉϣⲱⲡⲉ <text:line-break/><text:span text:style-name="T1"> </text:span><text:span text:style-name="T2">(75/31) </text:span> ⲙⲉⲛ ⲉⲥⲉⲓⲛⲉ ⲛ̅ⲧⲏ ⲉⲧⲙⲟ‐ <text:line-break/><text:span text:style-name="T1"> </text:span><text:span text:style-name="T2">(75/32) </text:span> ⲟⲩⲧ· ⲁⲗⲗⲁ ⲥⲛⲁⲟⲩⲱⲛ̅ϩ̅ ⲁⲛ <text:line-break/><text:span text:style-name="T1"> </text:span><text:span text:style-name="T2">(75/33) </text:span> ⲛ̅ⲧⲉⲥⲫⲩⲥⲓⲥ ⲉⲃⲟⲗ· ⲉⲥϣⲟ‐ <text:line-break/><text:span text:style-name="T1"> </text:span><text:span text:style-name="T2">(75/34) </text:span> ⲟⲡ ⲙⲁⲩⲁⲁⲥ ⲉⲛⲧⲟⲥ ⲧⲉ ϯ‐ <text:line-break/><text:span text:style-name="T1"> </text:span><text:span text:style-name="T2">(76/1) </text:span> ⲁⲧⲙⲟⲩ· ⲉⲥϣⲟϫⲛⲉ ⲉⲧⲃⲉ <text:line-break/><text:span text:style-name="T1"> </text:span><text:span text:style-name="T2">(76/2) </text:span> ⲟⲩⲁⲧⲙⲟⲩ· ⲉⲥⲣ̅ⲡⲓⲥⲧⲉⲩⲉ <text:line-break/><text:span text:style-name="T1"> </text:span><text:span text:style-name="T2">(76/3) </text:span> ⲁⲩⲱ ⲉⲥ̅ⲣ̅ⲉⲡⲓⲑⲩⲙⲓ ⲉⲕⲱ ⲛ̅ⲥⲱⲥ <text:line-break/><text:soft-page-break/><text:span text:style-name="T1"> </text:span><text:span text:style-name="T2">(76/4) </text:span> ⲛ̅ⲛⲁⲓ̈· ⲟⲩⲧⲉ ⲅⲁⲣ ⲙⲁⲩⲕⲉⲧ̅ϥ̅ ⲕ̅ⲛ̅ <text:line-break/><text:span text:style-name="T1"> </text:span><text:span text:style-name="T2">(76/5) </text:span> ⲧⲉ ⲉⲃⲟⲗ ϩ̅ⲛ̅ ϩⲉⲛⲥⲟⲩⲣⲉ· ⲏ%0 ⲉⲃⲟⲗ <text:line-break/><text:span text:style-name="T1"> </text:span><text:span text:style-name="T2">(76/6) </text:span> ϩ̅ⲛ̅ ϩⲉⲛϣⲟⲛⲧⲉ· ⲉϣⲱⲡⲉ ⲉⲩ‐ <text:line-break/><text:span text:style-name="T1"> </text:span><text:span text:style-name="T2">(76/7) </text:span> ϣⲁⲛⲣ̅ ⲥⲁⲃⲉ· ⲟⲩⲇⲉ ⲉⲗⲟⲟⲗⲉ <text:line-break/><text:span text:style-name="T1"> </text:span><text:span text:style-name="T2">(76/8) </text:span> ⲉⲃⲟⲗ ϩ̅ⲛ̅ ⲥⲟⲩⲣⲉ ⲛ̅ⲛⲟϫⲉ· ⲡⲏ‐ <text:line-break/><text:span text:style-name="T1"> </text:span><text:span text:style-name="T2">(76/9) </text:span> ⲙⲉⲛ ⲅⲁⲣ ⲉϣⲁϥϣⲱⲡⲉ ⲛ̅ⲟⲩ‐ <text:line-break/><text:span text:style-name="T1"> </text:span><text:span text:style-name="T2">(76/10) </text:span> ⲟⲉⲓϣ ⲛⲓⲙ ϩ̅ⲙ̅ ⲡⲏ ⲉⲧⲉϥϣⲟⲟⲡ <text:line-break/><text:span text:style-name="T1"> </text:span><text:span text:style-name="T2">(76/11) </text:span> ⲉⲃⲟⲗ ⲛ̅ϩⲏⲧ̅ϥ̅· ⲉϥϣⲟⲟⲡ ⲉⲃⲟⲗ <text:line-break/><text:span text:style-name="T1"> </text:span><text:span text:style-name="T2">(76/12) </text:span> ϩ̅ⲙ̅ ⲡⲏ ⲉⲧⲛⲁⲛⲟⲩϥ ⲁⲛ· ⲉϣⲁϥ <text:line-break/><text:span text:style-name="T1"> </text:span><text:span text:style-name="T2">(76/13) </text:span> ϣⲱⲡⲉ ⲉⲩⲧⲁⲕⲟ ⲛⲁⲥ ⲙ̅ⲛ̅ ⲟⲩ‐ <text:line-break/><text:span text:style-name="T1"> </text:span><text:span text:style-name="T2">(76/14) </text:span> ⲙⲟⲩ· ⲧⲏ ⲇⲉ ⲉϣⲁⲥϣⲱⲡⲉ <text:line-break/><text:span text:style-name="T1"> </text:span><text:span text:style-name="T2">(76/15) </text:span> ϩ̅ⲙ̅ ⲡⲓϣⲁ ⲉⲛⲉϩ ϩ̅ⲙ̅ ⲡⲏ ⲛ̅ⲧⲉ <text:line-break/><text:span text:style-name="T1"> </text:span><text:span text:style-name="T2">(76/16) </text:span> ⲡⲱⲛ̅ϩ̅· ⲙ̅ⲛ̅ ϯⲙ̅ⲛⲧ̅ⲁⲧⲙⲟⲩ ⲛ̅‐ <text:line-break/><text:span text:style-name="T1"> </text:span><text:span text:style-name="T2">(76/17) </text:span> ⲧⲉ ⲡⲓⲱⲛ̅ϩ̅ ⲉⲧⲟⲩⲉⲓⲛⲉ ⲙ̅ⲙⲟϥ· <text:line-break/><text:span text:style-name="T1"> </text:span><text:span text:style-name="T2">(76/18) </text:span> ⲡⲏ ⲟⲩⲛ ⲧⲏⲣ̅ϥ̅ ⲉⲧⲉ ⲛ̅ϥ̅ϣⲟⲟⲡ <text:line-break/><text:span text:style-name="T1"> </text:span><text:span text:style-name="T2">(76/19) </text:span> ⲁⲛ ⲉϥⲛⲁⲃⲱⲗ ⲉⲃⲟⲗ ⲉϩⲣⲁⲓ̈ ⲉⲡⲉ‐ <text:line-break/><text:span text:style-name="T1"> </text:span><text:span text:style-name="T2">(76/20) </text:span> ⲧⲉ ⲛ̅ϥ̅ϣⲟⲟⲡ ⲁⲛ· ⲥⲉϣⲟⲟⲡ <text:line-break/><text:span text:style-name="T1"> </text:span><text:span text:style-name="T2">(76/21) </text:span> ⲅⲁⲣ ⲛ̅ϭⲓ ϩⲉⲛⲕⲟⲩⲣ ⲁⲩⲱ ϩⲉⲛ‐ <text:line-break/><text:span text:style-name="T1"> </text:span><text:span text:style-name="T2">(76/22) </text:span> ⲃ̅ⲗ̅ⲗⲉⲉⲩⲉ ⲉⲩϩⲟⲧ̅ⲡ̅ ⲙ̅ⲛ̅ ⲛⲉ‐ <text:line-break/><text:span text:style-name="T1"> </text:span><text:span text:style-name="T2">(76/23) </text:span> ⲧⲉⲛⲟⲩⲟⲩ ⲙⲁⲩⲁⲁⲩ· ϩⲉⲛ‐ <text:line-break/><text:span text:style-name="T1"> </text:span><text:span text:style-name="T2">(76/24) </text:span> ⲕⲟⲟⲩⲉ ⲇⲉ ⲉⲩⲉⲟⲩⲱⲧ̅ⲃ̅ <text:line-break/><text:span text:style-name="T1"> </text:span><text:span text:style-name="T2">(76/25) </text:span> ⲉⲃⲟⲗ ϩ̅ⲛ̅ ϩⲉⲛϣⲁϫⲉ ⲙ̅ⲡⲟⲛⲏ‐ <text:line-break/><text:span text:style-name="T1"> </text:span><text:span text:style-name="T2">(76/26) </text:span> ⲣⲟⲛ ⲙ̅ⲛ̅ ϩⲉⲛⲙⲩⲥⲧⲏⲣⲓⲟⲛ <text:line-break/><text:span text:style-name="T1"> </text:span><text:span text:style-name="T2">(76/27) </text:span> ⲛ̅ⲥⲉⲣ̅ⲙ̅ ⲗⲁⲟⲥ· ϩⲉⲛϩⲟⲓ̈ⲛⲉ <text:line-break/><text:span text:style-name="T1"> </text:span><text:span text:style-name="T2">(76/28) </text:span> ⲉⲛⲥⲉⲥⲟⲟⲩⲛ ⲙ̅ⲙⲩⲥⲧⲏⲣⲓ‐ <text:line-break/><text:span text:style-name="T1"> </text:span><text:span text:style-name="T2">(76/29) </text:span> ⲟⲛ ⲁⲛ· ⲉⲩϫⲱ ⲛ̅ⲛⲏ ⲉⲧⲉ ⲛ̅‐ <text:line-break/><text:span text:style-name="T1"> </text:span><text:span text:style-name="T2">(76/30) </text:span> ⲥⲉⲥⲟⲟⲩⲛ ⲙ̅ⲙⲟⲟⲩ ⲁⲛ· <text:line-break/><text:span text:style-name="T1"> </text:span><text:span text:style-name="T2">(76/31) </text:span> ⲁⲗⲗⲁ ⲥⲉⲛⲁϣⲟⲩϣⲟⲩ ⲙ̅‐ <text:line-break/><text:span text:style-name="T1"> </text:span><text:span text:style-name="T2">(76/32) </text:span> ⲙ̅ⲟⲟⲩ· ϫⲉ ⲉϥⲛ̅ⲧⲟⲟⲧⲟⲩ <text:line-break/><text:span text:style-name="T1"> </text:span><text:span text:style-name="T2">(76/33) </text:span> ⲛ̅ϭⲓ ⲡⲓⲙⲩⲥⲧⲏⲣⲓⲟⲛ ⲙⲁⲩ <text:line-break/><text:span text:style-name="T1"> </text:span><text:span text:style-name="T2">(76/34) </text:span> ⲁⲁⲩ ⲛ̅ⲧⲉ ϯⲙ̅ⲛ̅ⲧⲙⲉ· ⲁⲩⲱ̣ <text:line-break/><text:span text:style-name="T1"> </text:span><text:span text:style-name="T2">(76/35) </text:span> ⲛ̅ϩⲣⲁⲓ̈ ϩ̅ⲛ̅ ⲟⲩϫⲓⲥⲉ ⲛ̅ϩⲏⲧ <text:line-break/><text:span text:style-name="T1"> </text:span><text:span text:style-name="T2">(77/1) </text:span> ⲉⲩⲉϩ̅ⲓ̅ ⲧⲟⲟⲧⲟⲩ ⲉⲧⲙ̅ⲛⲧ̅ <text:line-break/><text:span text:style-name="T1"> </text:span><text:span text:style-name="T2">(77/2) </text:span> ϫⲁⲥⲓϩⲏⲧ· ⲉⲣ̅ⲫⲑⲟⲛⲓ ⲉϯⲯⲩ‐ <text:line-break/><text:span text:style-name="T1"> </text:span><text:span text:style-name="T2">(77/3) </text:span> ⲭⲏ ⲛ̅ⲁⲧⲙⲟⲩ ⲉⲧⲁⲥⲣ̅ ⲉⲟⲩⲱ̅· <text:line-break/><text:span text:style-name="T1"> </text:span><text:span text:style-name="T2">(77/4) </text:span> ⲉⲝⲟⲩⲥⲓⲁ ⲅⲁⲣ ⲛⲓⲙ· ⲟⲩⲁⲣⲭⲏ· <text:line-break/><text:span text:style-name="T1"> </text:span><text:span text:style-name="T2">(77/5) </text:span> ⲁⲩⲱ ⲟⲩϭⲟⲙ ⲛ̅ⲧⲉ ⲛⲓⲁⲓⲱⲛ· <text:line-break/><text:span text:style-name="T1"> </text:span><text:span text:style-name="T2">(77/6) </text:span> ϣⲁⲩⲟⲩⲱϣ ⲉϣⲱⲡⲉ ⲙ̅ⲛ̅ <text:line-break/><text:span text:style-name="T1"> </text:span><text:span text:style-name="T2">(77/7) </text:span> ⲛⲁⲓ̈ ⲛ̅ϩⲣⲁⲓ̈ ϩ̅ⲙ̅ ⲡⲓⲥⲱⲛ̅ⲧ̅ ⲛ̅ⲧⲉ <text:line-break/><text:span text:style-name="T1"> </text:span><text:span text:style-name="T2">(77/8) </text:span> ⲡⲓⲕⲟⲥⲙⲟⲥ· ϩ̅ⲓ̅ⲛⲁ ⲛⲏ ⲉⲧⲉ <text:line-break/><text:span text:style-name="T1"> </text:span><text:span text:style-name="T2">(77/9) </text:span> ⲛ̅ⲥⲉϣⲟⲟⲡ ⲁⲛ ⲉⲃⲟⲗ ϩ̅ⲓ̅ⲧⲟⲟ‐ <text:line-break/><text:span text:style-name="T1"> </text:span><text:span text:style-name="T2">(77/10) </text:span> ⲧⲟⲩ ⲛ̅ⲛⲏ ⲉⲧϣⲟⲟⲡ ⲉⲁⲩⲱ <text:line-break/><text:span text:style-name="T1"> </text:span><text:span text:style-name="T2">(77/11) </text:span> ⲃ̅ϣ̅ ⲉⲣⲟⲟⲩ ⲛ̅ⲥⲉϯ ⲉⲟⲟⲩ ⲛⲁⲩ <text:line-break/><text:span text:style-name="T1"> </text:span><text:span text:style-name="T2">(77/12) </text:span> ⲉⲙⲡⲟⲩⲛⲟⲩϩ̅ⲙ̅· ⲟⲩⲧⲉ ⲙ̅ⲡⲟⲩ‐ <text:line-break/><text:span text:style-name="T1"> </text:span><text:span text:style-name="T2">(77/13) </text:span> ⲛ̅ⲧⲟⲩ ⲉⲧⲉϩ̅ⲓ̅ⲏ ⲉⲃⲟⲗ ϩ̅ⲓ̅ⲧⲟⲟⲧⲟⲩ· <text:line-break/><text:span text:style-name="T1"> </text:span><text:span text:style-name="T2">(77/14) </text:span> ⲉⲩⲟⲩⲱϣ ⲛ̅ⲟⲩⲟⲉⲓϣ ⲛⲓⲙ <text:line-break/><text:span text:style-name="T1"> </text:span><text:span text:style-name="T2">(77/15) </text:span> ϩ̅ⲓ̅ⲛⲁ ϫⲉ ⲉⲩⲛⲁϣⲱⲡⲉ ⲉⲛ̅ⲧⲟ‐ <text:line-break/><text:soft-page-break/><text:span text:style-name="T1"> </text:span><text:span text:style-name="T2">(77/16) </text:span> ⲟⲩ ⲛⲉ ⲛⲓⲁⲧⲃⲱⲗ ⲉⲃⲟⲗ· ⲉϣⲱ‐ <text:line-break/><text:span text:style-name="T1"> </text:span><text:span text:style-name="T2">(77/17) </text:span> ⲡⲉ ⲅⲁⲣ ⲉⲣϣⲁⲛϯⲯⲩⲭⲏ ⲛ̅ⲁⲧⲙⲟⲩ· <text:line-break/><text:span text:style-name="T1"> </text:span><text:span text:style-name="T2">(77/18) </text:span> ⲉⲥϣⲁⲛϫⲓ ϭⲟⲙ ⲛ̅ϩⲣⲁⲓ̈ ϩ̅ⲛ̅ ⲟⲩ‐ <text:line-break/><text:span text:style-name="T1"> </text:span><text:span text:style-name="T2">(77/19) </text:span> ⲡ̅ⲛ̅ⲁ̅ ⲛ̅ⲛⲟⲉⲣⲟⲛ· ⲛ̅ⲧⲉⲩⲛⲟⲩ‐ <text:line-break/><text:span text:style-name="T1"> </text:span><text:span text:style-name="T2">(77/20) </text:span> ⲇⲉ ϣⲁⲩⲣ̅ϩⲟⲣⲙⲁⲍⲉ ⲉϫ̅ⲙ̅ ⲡⲏ‐ <text:line-break/><text:span text:style-name="T1"> </text:span><text:span text:style-name="T2">(77/21) </text:span> ⲛ̅ⲧⲉ ⲛⲏ ⲛ̅ⲧⲁⲩⲥⲱⲣ̅ⲙ̅ ⲙ̅ⲙⲟ‐ <text:line-break/><text:span text:style-name="T1"> </text:span><text:span text:style-name="T2">(77/22) </text:span> ⲟⲩ· ϩⲉⲛⲕⲟⲟⲩⲉ ⲇⲉ ⲉⲛⲁ <text:line-break/><text:span text:style-name="T1"> </text:span><text:span text:style-name="T2">(77/23) </text:span> ϣⲱⲟⲩ ⲉⲩϯ ⲉϩⲟⲩⲛ ⲉϫ̅ⲛ̅ ϯ <text:line-break/><text:span text:style-name="T1"> </text:span><text:span text:style-name="T2">(77/24) </text:span> ⲙ̅ⲛ̅ⲧⲙⲉ ⲉⲧⲉ ⲛⲓⲁⲅⲅⲉⲗⲟⲥ <text:line-break/><text:span text:style-name="T1"> </text:span><text:span text:style-name="T2">(77/25) </text:span> ⲛⲉ ⲛ̅ⲧⲉ ϯⲡⲗⲁⲛⲏ· ⲉⲩⲛⲁ‐ <text:line-break/><text:span text:style-name="T1"> </text:span><text:span text:style-name="T2">(77/26) </text:span> ϭⲱⲣ̅ϭ̅ ⲛ̅ⲧⲉⲩⲡⲗⲁⲛⲏ ⲙ̅ⲛ̅ <text:line-break/><text:span text:style-name="T1"> </text:span><text:span text:style-name="T2">(77/27) </text:span> ⲡⲓⲛⲟⲙⲟⲥ ⲛ̅ⲧⲁⲩ ⲟⲩⲃⲉ ⲛⲓ <text:line-break/><text:span text:style-name="T1"> </text:span><text:span text:style-name="T2">(77/28) </text:span> ⲙⲉⲉⲩⲉ ⲛ̅ⲧⲏⲉⲓ ⲉⲧⲧⲟⲩ <text:line-break/><text:span text:style-name="T1"> </text:span><text:span text:style-name="T2">(77/29) </text:span> ⲃⲏⲟⲩⲧ· ϩⲱⲥ ⲉⲩϭⲱϣ̅ⲧ̅ <text:line-break/><text:span text:style-name="T1"> </text:span><text:span text:style-name="T2">(77/30) </text:span> ⲉⲃⲟⲗ ϩ̅ⲛ̅ ⲟⲩⲁ ⲉⲩⲙⲉⲉⲩⲉ <text:line-break/><text:span text:style-name="T1"> </text:span><text:span text:style-name="T2">(77/31) </text:span> ϫⲉ ⲛⲓⲁⲅⲁⲑⲟⲛ ⲙ̅ⲛ̅ ⲛⲓⲡⲟⲛⲏ‐ <text:line-break/><text:span text:style-name="T1"> </text:span><text:span text:style-name="T2">(77/32) </text:span> ⲣⲟⲛ ϫⲉ ϩⲉⲛⲉⲃⲟⲗ ϩ̅ⲛ̅ ⲟⲩ̣ⲁ ⲛⲉ· <text:line-break/><text:span text:style-name="T1"> </text:span><text:span text:style-name="T2">(77/33) </text:span> ⲉⲩⲣ̅ ⲉ̅ⲓ̅ⲉⲡϣⲱⲧ ⲛ̅ϩⲣⲁⲓ̈ ϩ̅ⲙ̅ <text:line-break/><text:span text:style-name="T1"> </text:span><text:span text:style-name="T2">(78/1) </text:span> ⲡⲁϣⲁϫⲉ· ⲁⲩⲱ ⲉⲩⲉⲕⲱ ⲉϩⲣⲁⲓ̈ <text:line-break/><text:span text:style-name="T1"> </text:span><text:span text:style-name="T2">(78/2) </text:span> ⲛ̅ⲟⲩϩ̅ⲓ̅ⲙⲁⲣⲙⲉⲛⲏ ⲉⲥⲛⲁϣ̅ⲧ̅ <text:line-break/><text:span text:style-name="T1"> </text:span><text:span text:style-name="T2">(78/3) </text:span> ⲉⲩⲛⲁⲡⲱⲧ ⲛ̅ϩⲣⲁⲓ̈ ⲛ̅ϩⲏⲧ̅ⲥ̅ ϩ̅ⲛ̅ <text:line-break/><text:span text:style-name="T1"> </text:span><text:span text:style-name="T2">(78/4) </text:span> ⲟⲩⲡⲉⲧϣⲟⲩⲉⲓⲧ ⲛ̅ϭⲓ ⲡⲓⲅⲉ‐ <text:line-break/><text:span text:style-name="T1"> </text:span><text:span text:style-name="T2">(78/5) </text:span> ⲛⲟⲥ ⲛ̅ⲧⲉ ⲛⲓⲯⲩⲭⲏ ⲛ̅ⲁⲧⲙⲟⲩ <text:line-break/><text:span text:style-name="T1"> </text:span><text:span text:style-name="T2">(78/6) </text:span> ϣⲁϩⲣⲁⲓ̈ ⲉⲧⲁⲡⲁⲣⲟⲩⲥⲓⲁ· ⲉⲩ‐ <text:line-break/><text:span text:style-name="T1"> </text:span><text:span text:style-name="T2">(78/7) </text:span> ⲉϣⲱⲡⲉ ⲅⲁⲣ ⲉⲃⲟⲗ ⲛ̅ϩⲏⲧⲟⲩ <text:line-break/><text:span text:style-name="T1"> </text:span><text:span text:style-name="T2">(78/8) </text:span> ⲁⲩⲱ ⲡⲓⲕⲱ ⲉⲃⲟⲗ ⲛ̅ⲧⲁⲓ̈ ⲛ̅ⲧⲉ <text:line-break/><text:span text:style-name="T1"> </text:span><text:span text:style-name="T2">(78/9) </text:span> ⲛⲟⲩⲡⲁⲣⲁⲡⲧⲱⲙⲁ· ⲛⲏ ⲛ̅ⲧⲁⲩ‐ <text:line-break/><text:span text:style-name="T1"> </text:span><text:span text:style-name="T2">(78/10) </text:span> ϩⲉ ⲛ̅ϩⲣⲁⲓ̈ ⲛ̅ϩⲏⲧⲟⲩ ⲉⲃⲟⲗ ϩ̅ⲓ̅ⲧⲟ‐ <text:line-break/><text:span text:style-name="T1"> </text:span><text:span text:style-name="T2">(78/11) </text:span> ⲟⲧⲟⲩ ⲛ̅ⲛⲓⲁⲛⲧⲓⲕⲓⲙⲉⲛⲟⲥ· <text:line-break/><text:span text:style-name="T1"> </text:span><text:span text:style-name="T2">(78/12) </text:span> ⲉⲧⲉ ⲁⲓ̈ϫⲓ ⲙ̅ⲡⲓⲥⲱⲧⲉ ⲛ̅ⲧⲁⲩ‐ <text:line-break/><text:span text:style-name="T1"> </text:span><text:span text:style-name="T2">(78/13) </text:span> ⲡⲣⲟⲥ ϯⲙ̅ⲛ̅ⲧ̅ϩ̅ⲙ̅ϩⲁⲗ ⲛ̅ⲧⲁⲩ‐ <text:line-break/><text:span text:style-name="T1"> </text:span><text:span text:style-name="T2">(78/14) </text:span> ϣⲱⲡⲉ ⲛ̅ϩⲏⲧ̅ⲥ̅ ⲉϯ ⲛⲁⲩ ⲛ̅ⲟⲩ‐ <text:line-break/><text:span text:style-name="T1"> </text:span><text:span text:style-name="T2">(78/15) </text:span> ⲙ̅ⲛ̅ⲧⲣ̅ⲙ̅ϩⲉ· ϫⲉ ⲉⲩⲉⲧⲁⲙⲓⲟ <text:line-break/><text:span text:style-name="T1"> </text:span><text:span text:style-name="T2">(78/16) </text:span> ⲛ̅ⲟⲩϣⲱϫ̅ⲡ̅ ⲛ̅ⲁⲛⲧⲓⲙⲓⲙⲟⲛ <text:line-break/><text:span text:style-name="T1"> </text:span><text:span text:style-name="T2">(78/17) </text:span> ⲉⲡⲣⲁⲛ ⲛ̅ⲧⲉ ⲟⲩⲣⲉϥⲙⲟⲟⲩⲧ <text:line-break/><text:span text:style-name="T1"> </text:span><text:span text:style-name="T2">(78/18) </text:span> ⲉⲧⲉ ϩⲉⲣⲙⲁ ⲡⲉ ⲛ̅ⲧⲉ ⲡⲓϣⲟ‐ <text:line-break/><text:span text:style-name="T1"> </text:span><text:span text:style-name="T2">(78/19) </text:span> ⲣ̅ⲡ̅ ⲙ̅ⲙⲓⲥⲉ ⲛ̅ⲧⲉ ⲧⲁⲇⲓⲕⲓⲁ· <text:line-break/><text:span text:style-name="T1"> </text:span><text:span text:style-name="T2">(78/20) </text:span> ϩ̅ⲓ̅ⲛⲁ ⲡⲓⲟⲩⲟⲉⲓⲛ ⲉⲧϣⲟⲟⲡ <text:line-break/><text:span text:style-name="T1"> </text:span><text:span text:style-name="T2">(78/21) </text:span> ϫⲉ ⲛ̅ⲛⲟⲩⲛⲁϩⲧⲉ ⲉⲣⲟϥ ⲉⲃⲟⲗ <text:line-break/><text:span text:style-name="T1"> </text:span><text:span text:style-name="T2">(78/22) </text:span> ϩ̅ⲓ̅ⲧⲟⲟⲧⲟⲩ ⲛ̅ⲛⲓⲕⲟⲩⲉⲓ· ⲛⲁⲓ̈ <text:line-break/><text:span text:style-name="T1"> </text:span><text:span text:style-name="T2">(78/23) </text:span> ⲇⲉ ⲙ̅ⲡⲓⲣⲏⲧⲉ ⲛⲉ ⲛⲓⲉⲣⲅⲁⲧⲏⲥ <text:line-break/><text:span text:style-name="T1"> </text:span><text:span text:style-name="T2">(78/24) </text:span> ⲉⲩⲛⲁⲛⲟϫⲟⲩ ⲉⲡⲓⲕⲁⲕⲉ ⲉⲧ‐ <text:line-break/><text:span text:style-name="T1"> </text:span><text:span text:style-name="T2">(78/25) </text:span> ⲥⲁⲃⲟⲗ· ⲛ̅ⲥⲁⲃⲟⲗ ⲛ̅ⲛⲓϣⲏⲣⲉ <text:line-break/><text:span text:style-name="T1"> </text:span><text:span text:style-name="T2">(78/26) </text:span> ⲛ̅ⲧⲉ ⲡⲟⲩⲟⲉⲓⲛ· ⲟⲩⲧⲉ ⲅⲁⲣ <text:line-break/><text:span text:style-name="T1"> </text:span><text:span text:style-name="T2">(78/27) </text:span> ⲛ̅ⲧⲟⲟⲩ ⲛ̅ⲥⲉⲛ̅ⲛⲏⲟⲩ ⲉϩⲟⲩⲛ <text:line-break/><text:span text:style-name="T1"> </text:span><text:span text:style-name="T2">(78/28) </text:span> ⲁⲛ· ⲁⲗⲗⲁ ⲟⲩⲧⲉ ⲛ̅ⲥⲉⲕⲱ ⲁⲛ <text:line-break/><text:span text:style-name="T1"> </text:span><text:span text:style-name="T2">(78/29) </text:span> ⲛ̅ⲛⲏ ⲉⲧⲛⲏⲩ ϣⲁϩⲣⲁⲓ̈ ⲉⲡⲓϯ‐ <text:line-break/><text:soft-page-break/><text:span text:style-name="T1"> </text:span><text:span text:style-name="T2">(78/30) </text:span> ⲙⲉⲧⲉ ⲛ̅ⲧⲁⲩ ⲡⲣⲟⲥ ⲡⲓⲃⲱⲗ ⲉ‐ <text:line-break/><text:span text:style-name="T1"> </text:span><text:span text:style-name="T2">(78/31) </text:span> ⲃⲟⲗ ⲛ̅ⲧⲉ ⲛⲏ· ϩⲉⲛⲕⲟⲟⲩⲉ ⲇⲉ <text:line-break/><text:span text:style-name="T1"> </text:span><text:span text:style-name="T2">(78/32) </text:span> ⲟⲛ ⲉⲃⲟⲗ ⲛ̅ϩⲏⲧⲟⲩ ⲉⲩⲛ̅ⲧⲁⲩ <text:line-break/><text:span text:style-name="T1"> </text:span><text:span text:style-name="T2">(78/33) </text:span> ⲙ̅ⲙⲁⲩ ⲙ̅ⲡⲓⲙ̅ⲕⲁϩ· ⲉⲩⲙⲉ <text:line-break/><text:span text:style-name="T1"> </text:span><text:span text:style-name="T2">(78/34) </text:span> ⲉⲩⲉ ϫⲉ ⲉⲩⲛⲁϫⲱⲕ ⲉⲃⲟⲗ ⲛ̣̅‐ <text:line-break/><text:span text:style-name="T1"> </text:span><text:span text:style-name="T2">(79/1) </text:span> ϯⲙ̅ⲛ̅ⲧ̅ⲥⲁⲃⲉ ⲛ̅ⲧⲉ ϯⲙ̅ⲛⲧ̅ⲥⲟⲛ <text:line-break/><text:span text:style-name="T1"> </text:span><text:span text:style-name="T2">(79/2) </text:span> ⲉⲧϣⲟⲟⲡ ⲟⲛⲧⲱⲥ· ⲉⲧⲉ ϯ‐ <text:line-break/><text:span text:style-name="T1"> </text:span><text:span text:style-name="T2">(79/3) </text:span> ⲙ̅ⲛ̅ⲧ̅ϣⲃⲏⲣ ⲙ̅ⲡ̅ⲛⲁ̅ ⲧⲉ ⲙ̅ⲛ̅ ⲛⲓ‐ <text:line-break/><text:span text:style-name="T1"> </text:span><text:span text:style-name="T2">(79/4) </text:span> ϣⲃⲏⲣ ⲛ̅ⲛⲟⲩⲛⲉ ϩ̅ⲛ̅ ⲟⲩⲕⲟⲓ‐ <text:line-break/><text:span text:style-name="T1"> </text:span><text:span text:style-name="T2">(79/5) </text:span> ⲛⲱⲛⲓⲁ· ⲉⲧⲉ ⲉⲃⲟⲗ ϩ̅ⲓ̅ⲧⲟⲟⲧ̅ⲥ̅ <text:line-break/><text:span text:style-name="T1"> </text:span><text:span text:style-name="T2">(79/6) </text:span> ⲉϥⲉⲟⲩⲱⲛ̅ϩ̅ ⲉⲃⲟⲗ ⲛ̅ϭⲓ ⲡⲓ‐ <text:line-break/><text:span text:style-name="T1"> </text:span><text:span text:style-name="T2">(79/7) </text:span> ϫⲓ ϣⲉⲗⲉⲉⲧ ⲛ̅ⲧⲉ ϯⲁⲫⲑⲁⲣ‐ <text:line-break/><text:span text:style-name="T1"> </text:span><text:span text:style-name="T2">(79/8) </text:span> ⲥⲓⲁ· ⲉϥⲛⲁⲟⲩⲱⲛ̅ϩ̅ ⲉⲃⲟⲗ ⲛ̅‐ <text:line-break/><text:span text:style-name="T1"> </text:span><text:span text:style-name="T2">(79/9) </text:span> ϭⲓ ⲡⲓⲉⲓⲛⲉ ⲛ̅ⲅⲉⲛⲟⲥ ⲛ̅ⲧⲉ ϯ <text:line-break/><text:span text:style-name="T1"> </text:span><text:span text:style-name="T2">(79/10) </text:span> ⲙ̅ⲛ̅ⲧ̅ⲥⲱⲛⲉ ⲕⲁⲧⲁ ⲟⲩⲁⲛⲧⲓ‐ <text:line-break/><text:span text:style-name="T1"> </text:span><text:span text:style-name="T2">(79/11) </text:span> ⲙⲓⲙⲟⲛ· ⲛⲁⲓ̈ ⲛⲉ ⲛⲏ ⲉⲧⲗⲱ‐ <text:line-break/><text:span text:style-name="T1"> </text:span><text:span text:style-name="T2">(79/12) </text:span> ϫ̅ϩ̅ ⲛ̅ⲛⲉⲩⲥⲛⲏⲩ ⲉⲩϫⲱ ⲙ̅‐ <text:line-break/><text:span text:style-name="T1"> </text:span><text:span text:style-name="T2">(79/13) </text:span> ⲙⲟⲥ ⲛⲁⲩ ϫⲉ ⲉⲃⲟⲗ ϩ̅ⲓ̅ⲧ̅ⲙ̅ ⲡⲁⲓ̈ <text:line-break/><text:span text:style-name="T1"> </text:span><text:span text:style-name="T2">(79/14) </text:span> ⲉϣⲁϥⲛⲁ ⲛ̅ϭⲓ ⲡⲉⲛⲛⲟⲩⲧⲉ· <text:line-break/><text:span text:style-name="T1"> </text:span><text:span text:style-name="T2">(79/15) </text:span> ⲉϣⲱⲡⲉ ⲉⲣⲉⲟⲩⲟⲩϫⲁⲓ̈ ϣⲱ‐ <text:line-break/><text:span text:style-name="T1"> </text:span><text:span text:style-name="T2">(79/16) </text:span> ⲡⲉ ⲛⲁⲛ ϩ̅ⲙ̅ ⲡⲁⲓ̈· ⲉⲛⲥⲉⲥⲟⲟⲩⲛ <text:line-break/><text:span text:style-name="T1"> </text:span><text:span text:style-name="T2">(79/17) </text:span> ⲁⲛ ⲛ̅ϯⲕⲟⲗⲁⲥⲓⲥ ⲛ̅ⲧⲉ ⲛⲏ ⲉⲧ‐ <text:line-break/><text:span text:style-name="T1"> </text:span><text:span text:style-name="T2">(79/18) </text:span> ⲣⲟⲟⲩⲧ· ⲉⲃⲟⲗ ϩ̅ⲓ̅ⲧ̅ⲛ̅ ⲛⲏ ⲛ̅ⲧⲁⲩ‐ <text:line-break/><text:span text:style-name="T1"> </text:span><text:span text:style-name="T2">(79/19) </text:span> ⲉⲓⲣⲉ ⲙ̅ⲡⲓϩⲱⲃ ⲛ̅ⲛⲓⲕⲟⲩⲉ̅ⲓ̅ ⲛ̅‐ <text:line-break/><text:span text:style-name="T1"> </text:span><text:span text:style-name="T2">(79/20) </text:span> ⲧⲁⲩⲛⲁⲩ ⲉⲣⲟⲟⲩ ⲛ̅ⲧⲁⲩⲣ̅ⲁⲓ <text:line-break/><text:span text:style-name="T1"> </text:span><text:span text:style-name="T2">(79/21) </text:span> ⲭⲙⲁⲗⲱⲧⲉⲩⲉ ⲙ̅ⲙⲟⲟⲩ· ⲉⲩ‐ <text:line-break/><text:span text:style-name="T1"> </text:span><text:span text:style-name="T2">(79/22) </text:span> ⲉϣⲱⲡⲉ ⲇⲉ ⲛ̅ϭⲓ ϩⲉⲛⲕⲟⲟⲩⲉ <text:line-break/><text:span text:style-name="T1"> </text:span><text:span text:style-name="T2">(79/23) </text:span> ⲛ̅ⲧⲉ ⲛⲏ ⲉⲧⲥⲁⲃⲟⲗ ⲛ̅ⲧⲉ ⲧⲉⲛ‐ <text:line-break/><text:span text:style-name="T1"> </text:span><text:span text:style-name="T2">(79/24) </text:span> ⲏⲡⲉ· ⲉⲩϯ ⲣⲁⲛ ⲉⲣⲟⲟⲩ ϫⲉ <text:line-break/><text:span text:style-name="T1"> </text:span><text:span text:style-name="T2">(79/25) </text:span> ⲉⲡⲓⲥⲕⲟⲡⲟⲥ· ⲉⲧⲓ ⲇⲉ ϩⲉⲛ‐ <text:line-break/><text:span text:style-name="T1"> </text:span><text:span text:style-name="T2">(79/26) </text:span> ⲇⲓⲁⲕⲱⲛ ϩⲱⲥ ⲉⲁⲩϫⲓ ⲛ̅ⲛⲟⲩ <text:line-break/><text:span text:style-name="T1"> </text:span><text:span text:style-name="T2">(79/27) </text:span> ⲉⲝⲟⲩⲥⲓⲁ ⲉⲃⲟⲗ ϩ̅ⲓ̅ⲧ̅ⲙ̅ ⲡⲛⲟⲩ‐ <text:line-break/><text:span text:style-name="T1"> </text:span><text:span text:style-name="T2">(79/28) </text:span> ⲧⲉ ⲉⲩⲣⲓⲕⲉ ⲙ̅ⲙⲟⲟⲩ ϩⲁ ⲡⲓ‐ <text:line-break/><text:span text:style-name="T1"> </text:span><text:span text:style-name="T2">(79/29) </text:span> ϩⲁⲡ ⲛ̅ⲧⲉ ⲛⲓϣⲟⲣ̅ⲡ̅ ⲙ̅ⲙⲁ ⲛ̅‐ <text:line-break/><text:span text:style-name="T1"> </text:span><text:span text:style-name="T2">(79/30) </text:span> ϩⲙⲟⲟⲥ ⲛⲏ ⲉⲧ̅ⲙ̅ⲙⲁⲩ ⲛⲉ <text:line-break/><text:span text:style-name="T1"> </text:span><text:span text:style-name="T2">(79/31) </text:span> ⲛⲓⲟⲟⲣ ⲛ̅ⲁⲧⲙⲟⲟⲩ· ⲁⲛ̣ⲟⲕ <text:line-break/><text:span text:style-name="T1"> </text:span><text:span text:style-name="T2">(79/32) </text:span> ⲇⲉ ⲡⲉϫⲁⲓ̈ ϫⲉ ϯⲣ̅ ϩⲟⲧⲉ ⲉ̣ⲧⲃⲉ <text:line-break/><text:span text:style-name="T1"> </text:span><text:span text:style-name="T2">(79/33) </text:span> ⲛⲏ ⲛ̅ⲧⲁⲕϫⲟⲟⲩ ⲛⲁⲓ̈· ϫ[ⲉ] ϩⲉⲛ‐ <text:line-break/><text:span text:style-name="T1"> </text:span><text:span text:style-name="T2">(80/1) </text:span> ⲕⲟⲩⲉⲓ ⲙⲉⲛ ⲛ̅ⲛⲁϩⲣⲁⲛ ⲛⲉ ⲛⲓ‐ <text:line-break/><text:span text:style-name="T1"> </text:span><text:span text:style-name="T2">(80/2) </text:span> ⲡⲁⲣⲁ ⲡϣⲱⲗ̅ϩ̅· ⲉⲩⲛ̅ ϩⲉⲛⲙⲏ‐ <text:line-break/><text:span text:style-name="T1"> </text:span><text:span text:style-name="T2">(80/3) </text:span> ⲏϣⲉ ⲙⲉⲛ ⲉⲩⲛⲁⲥⲱⲣ̅ⲙ̅ ⲛ̅ϩⲉⲛ‐ <text:line-break/><text:span text:style-name="T1"> </text:span><text:span text:style-name="T2">(80/4) </text:span> ⲕⲉⲙⲏⲏϣⲉ ⲛ̅ⲧⲉ ⲛⲉⲧⲟⲛ̅ϩ̅· <text:line-break/><text:span text:style-name="T1"> </text:span><text:span text:style-name="T2">(80/5) </text:span> ⲉⲩⲟⲩⲱϭ̅ⲡ̅ ⲙ̅ⲙⲟⲟⲩ ⲛ̅ϩⲣⲁⲓ̈ <text:line-break/><text:span text:style-name="T1"> </text:span><text:span text:style-name="T2">(80/6) </text:span> ⲛ̅ϩⲏⲧⲟⲩ· ⲁⲩⲱ ⲉⲩϫⲱ ⲙ̅ⲡⲉ‐ <text:line-break/><text:span text:style-name="T1"> </text:span><text:span text:style-name="T2">(80/7) </text:span> ⲕⲣⲁⲛ ⲥⲉⲛⲁⲧⲁⲛϩⲟⲩⲧⲟⲩ· <text:line-break/><text:span text:style-name="T1"> </text:span><text:span text:style-name="T2">(80/8) </text:span> ⲡⲉϫⲉ ⲡⲥⲱⲧⲏⲣ ϫⲉ ⲟⲩⲭⲣⲟ‐ <text:line-break/><text:span text:style-name="T1"> </text:span><text:span text:style-name="T2">(80/9) </text:span> ⲛⲟⲥ ⲡⲉⲧⲧⲏϣ ⲛⲁⲩ ϩ̅ⲛ̅ ⲟⲩ‐ <text:line-break/><text:soft-page-break/><text:span text:style-name="T1"> </text:span><text:span text:style-name="T2">(80/10) </text:span> ⲏⲡⲉ ⲛ̅ⲧⲉ ⲧⲟⲩⲡⲗⲁⲛⲏ ⲉⲩⲛⲁ <text:line-break/><text:span text:style-name="T1"> </text:span><text:span text:style-name="T2">(80/11) </text:span> ⲣ̅ⲣ̅ⲣⲟ ⲉϫ̅ⲛ̅ ⲛⲓⲕⲟⲩⲉⲓ· ⲁⲩⲱ ⲙ̅‐ <text:line-break/><text:span text:style-name="T1"> </text:span><text:span text:style-name="T2">(80/12) </text:span> ⲙ̅ⲛ̅ⲛ̅ⲥⲁ ⲡⲓϫⲱⲕ ⲉⲃⲟⲗ ⲛ̅ⲧⲉ <text:line-break/><text:span text:style-name="T1"> </text:span><text:span text:style-name="T2">(80/13) </text:span> ϯⲡⲗⲁⲛⲏ ⲉϥⲉⲣ̅ ⲃ̅ⲣ̅ⲣⲉ ⲛ̅ϭⲓ ⲡⲓⲁ‐ <text:line-break/><text:span text:style-name="T1"> </text:span><text:span text:style-name="T2">(80/14) </text:span> ⲧ̅ⲣ̅ ϩ̅ⲗ̅ⲗⲟ ⲛ̅ⲧⲉ ϯⲇⲓⲁⲛⲟⲓⲁ ⲛ̅ⲁⲧ‐ <text:line-break/><text:span text:style-name="T1"> </text:span><text:span text:style-name="T2">(80/15) </text:span> ⲙⲟⲩ· ⲁⲩⲱ ⲉⲩⲉⲣ̅ⲣ̅ⲣⲟ ⲉϫ̅ⲛ̅ <text:line-break/><text:span text:style-name="T1"> </text:span><text:span text:style-name="T2">(80/16) </text:span> ⲛⲏ ⲉⲧⲉ ⲛ̅ⲣ̅ⲣ̅ⲣⲟ ⲉϩⲣⲁⲓ̈ ⲉϫⲱⲟⲩ· <text:line-break/><text:span text:style-name="T1"> </text:span><text:span text:style-name="T2">(80/17) </text:span> ⲁⲩⲱ ⲧⲟⲩⲡⲗⲁⲛⲏ ⲉϥⲉⲧⲱ‐ <text:line-break/><text:span text:style-name="T1"> </text:span><text:span text:style-name="T2">(80/18) </text:span> ⲕ̅ⲙ̅ ⲛ̅ⲧⲉⲥⲛⲟⲩⲛⲉ· ⲁⲩⲱ ⲉϥⲉ‐ <text:line-break/><text:span text:style-name="T1"> </text:span><text:span text:style-name="T2">(80/19) </text:span> ⲁⲁⲥ ⲛ̅ⲥⲧⲣⲁϩ ⲛ̅ⲥ̅ⲟⲩⲱⲛ̅ϩ̅ ⲉⲃⲟⲗ <text:line-break/><text:span text:style-name="T1"> </text:span><text:span text:style-name="T2">(80/20) </text:span> ⲛ̅ϩⲣⲁⲓ̈ ϩ̅ⲛ̅ ⲙ̅ⲛ̅ⲧⲣ̅ⲙ̅ϩⲉ ⲛⲓⲙ· ⲉ‐ <text:line-break/><text:span text:style-name="T1"> </text:span><text:span text:style-name="T2">(80/21) </text:span> ⲁⲥϣⲱⲡ ⲙ̅ⲙⲟⲥ ⲉⲣⲟⲥ· ⲁⲩⲱ <text:line-break/><text:span text:style-name="T1"> </text:span><text:span text:style-name="T2">(80/22) </text:span> ⲛⲁⲓ̈ ⲙ̅ⲡⲓⲣⲏⲧⲉ ⲉⲩⲉϣⲱⲡⲉ <text:line-break/><text:span text:style-name="T1"> </text:span><text:span text:style-name="T2">(80/23) </text:span> ⲛ̅ⲛⲁⲧϣⲓⲃⲉ ⲱ̅ ⲡⲉⲧⲣⲉ· ⲁⲙⲟⲩ‐ <text:line-break/><text:span text:style-name="T1"> </text:span><text:span text:style-name="T2">(80/24) </text:span> ⲟⲩⲛ ⲙⲁⲣⲟⲛ ⲉϫ̅ⲙ̅ ⲡⲓϫⲱⲕ <text:line-break/><text:span text:style-name="T1"> </text:span><text:span text:style-name="T2">(80/25) </text:span> ⲛ̅ⲧⲉ ⲡⲓϯ ⲙⲁⲧⲉ ⲛ̅ⲧⲉ ⲡⲓⲱⲧ <text:line-break/><text:span text:style-name="T1"> </text:span><text:span text:style-name="T2">(80/26) </text:span> ⲛ̅ⲁⲧϫⲱϩ̅ⲙ̅· ⲉⲓⲥϩⲏⲏⲧⲉ <text:line-break/><text:span text:style-name="T1"> </text:span><text:span text:style-name="T2">(80/27) </text:span> ⲅⲁⲣ ⲥⲉⲛ̅ⲛⲏⲩ ⲛ̅ϭⲓ ⲛⲁⲓ̈ ⲉⲧⲛⲁ‐ <text:line-break/><text:span text:style-name="T1"> </text:span><text:span text:style-name="T2">(80/28) </text:span> ⲥⲱⲕ ⲛⲁⲩ ⲙ̅ⲡⲓϩⲁⲡ· ⲁⲩⲱ ⲉⲩ‐ <text:line-break/><text:span text:style-name="T1"> </text:span><text:span text:style-name="T2">(80/29) </text:span> ⲛⲁⲁⲁⲩ ⲛ̅ⲥⲣⲁϩ· ⲁⲛⲟⲕ ⲇⲉ <text:line-break/><text:span text:style-name="T1"> </text:span><text:span text:style-name="T2">(80/30) </text:span> ⲙ̅ⲙ̅ⲛ̅ ϭⲟⲙ ⲛ̅ⲥⲉϫⲱϩ ⲉⲣⲟⲉⲓ· <text:line-break/><text:span text:style-name="T1"> </text:span><text:span text:style-name="T2">(80/31) </text:span> ⲛ̅ⲧⲟⲕ ⲇⲉ ⲱ̅ ⲡⲉⲧⲣⲉ ⲉⲕⲉⲁϩⲉ <text:line-break/><text:span text:style-name="T1"> </text:span><text:span text:style-name="T2">(80/32) </text:span> ⲣⲁⲧ̣̅̅ⲕ̅ ϩ̅ⲛ̅ ⲧⲉⲩⲙⲏⲧⲉ· ⲙ̅ⲡ̅ⲣ̅ⲣ̣̅ <text:line-break/><text:span text:style-name="T1"> </text:span><text:span text:style-name="T2">(80/33) </text:span> ϩⲟ̣ⲧ̣ⲉ ⲉⲧⲃⲉ ⲧⲉⲕⲙ̅ⲛ̅ⲧ̅ϭⲁⲃ <text:line-break/><text:span text:style-name="T1"> </text:span><text:span text:style-name="T2">(81/1) </text:span> ϩⲏⲧ· ⲉⲩⲉⲧⲱⲙ ⲛ̅ϭⲓ ⲛⲉⲩ <text:line-break/><text:span text:style-name="T1"> </text:span><text:span text:style-name="T2">(81/2) </text:span> ⲇⲓⲁⲛⲟⲓⲁ· ⲁϥⲁϩⲉⲣⲁⲧ̅ϥ̅ ⲅⲁⲣ ⲛⲁⲩ <text:line-break/><text:span text:style-name="T1"> </text:span><text:span text:style-name="T2">(81/3) </text:span> ⲛ̅ϭⲓ ⲡⲓⲁϩⲟⲣⲁⲧⲟⲥ· ⲛⲁⲓ̈ ⲛ̅ⲧⲁ <text:line-break/><text:span text:style-name="T1"> </text:span><text:span text:style-name="T2">(81/4) </text:span> ⲣⲉϥϫⲟⲟⲩ· ⲁⲓ̈ⲛⲁⲩ ⲉⲣⲟϥ ⲉϥⲉ <text:line-break/><text:span text:style-name="T1"> </text:span><text:span text:style-name="T2">(81/5) </text:span> ⲙ̅ⲡⲣⲏⲧⲉ ⲉϣϫⲉ ⲉⲩⲁⲙⲁϩⲧⲉ <text:line-break/><text:span text:style-name="T1"> </text:span><text:span text:style-name="T2">(81/6) </text:span> ⲙ̅ⲙⲟϥ ⲉⲃⲟⲗ ϩ̅ⲓ̅ⲧⲟⲟⲧⲟⲩ· ⲁⲩⲱ <text:line-break/><text:span text:style-name="T1"> </text:span><text:span text:style-name="T2">(81/7) </text:span> ⲡⲉϫⲁⲓ̈ ϫⲉ ⲟⲩ ⲡⲉϯⲛⲁⲩ ⲉⲣⲟϥ <text:line-break/><text:span text:style-name="T1"> </text:span><text:span text:style-name="T2">(81/8) </text:span> ⲱ̅ ⲡϫⲟⲉⲓⲥ ϫⲉ ⲛ̅ⲧⲟⲕ ⲙⲁⲩⲁⲁⲕ <text:line-break/><text:span text:style-name="T1"> </text:span><text:span text:style-name="T2">(81/9) </text:span> ⲉⲧⲟⲩϫⲓ ⲙ̅ⲙⲟⲕ· ⲁⲩⲱ ⲉⲕⲁ <text:line-break/><text:span text:style-name="T1"> </text:span><text:span text:style-name="T2">(81/10) </text:span> ⲙⲁϩⲧⲉ ⲙ̅ⲙⲟⲓ̈· ⲏ ⲛⲓⲙ ⲡⲉ ⲡⲁⲓ̈ <text:line-break/><text:span text:style-name="T1"> </text:span><text:span text:style-name="T2">(81/11) </text:span> ⲉⲧⲣⲟⲟⲩⲧ ϩ̅ⲓ̅ϫ̅ⲙ̅ ⲡⲓϣⲉ ⲉⲧ‐ <text:line-break/><text:span text:style-name="T1"> </text:span><text:span text:style-name="T2">(81/12) </text:span> ⲥⲱⲃⲉ· ⲁⲩⲱ ⲕⲉⲟⲩⲁ ⲥⲉϩ̅ⲓ̅ⲟⲩ‐ <text:line-break/><text:span text:style-name="T1"> </text:span><text:span text:style-name="T2">(81/13) </text:span> ⲉ ⲉϫ̅ⲛ̅ ⲛⲉϥⲟⲩⲉⲣⲏⲧⲉ ⲁⲩⲱ <text:line-break/><text:span text:style-name="T1"> </text:span><text:span text:style-name="T2">(81/14) </text:span> ⲉϫ̅ⲛ̅ ⲛⲉϥϭⲓϫ· ⲡⲉϫⲁϥ ⲛⲁⲓ̈ ⲛ̅‐ <text:line-break/><text:span text:style-name="T1"> </text:span><text:span text:style-name="T2">(81/15) </text:span> ϭⲓ ⲡⲥⲱⲧⲏⲣ ϫⲉ ⲡⲏ ⲉⲧ̅ⲕ̅ⲛⲁⲩ <text:line-break/><text:span text:style-name="T1"> </text:span><text:span text:style-name="T2">(81/16) </text:span> ⲉⲣⲟϥ ϩ̅ⲓ̅ϫ̅ⲙ̅ ⲡⲓϣⲉ ⲉϥⲣⲟⲟⲩⲧ <text:line-break/><text:span text:style-name="T1"> </text:span><text:span text:style-name="T2">(81/17) </text:span> ⲁⲩⲱ ⲉϥⲥⲱⲃⲉ· ⲡⲁⲓ̈ ⲡⲉ ⲡⲉ‐ <text:line-break/><text:span text:style-name="T1"> </text:span><text:span text:style-name="T2">(81/18) </text:span> ⲧⲟⲛ̅ϩ̅ ⲓ̅ⲥ̅· ⲡⲏ ⲇⲉ ⲉⲧⲟⲩⲕⲱ‐ <text:line-break/><text:span text:style-name="T1"> </text:span><text:span text:style-name="T2">(81/19) </text:span> ⲗ̅ϩ̅ ⲛ̅ⲛⲓⲉⲓϥ̅ⲧ̅ ⲉⲛⲉϥϭⲓϫ ⲙ̅ⲛ̅ ⲛⲉϥ‐ <text:line-break/><text:span text:style-name="T1"> </text:span><text:span text:style-name="T2">(81/20) </text:span> ⲟⲩⲉⲣⲏⲧⲉ· ⲡⲓⲥⲁⲣⲕⲓⲕⲟⲛ ⲛ̅‐ <text:line-break/><text:span text:style-name="T1"> </text:span><text:span text:style-name="T2">(81/21) </text:span> ⲧⲁϥ ⲡⲉ· ⲉⲧⲉ ⲡⲓϣⲉⲃⲓⲱ ⲡⲉ <text:line-break/><text:span text:style-name="T1"> </text:span><text:span text:style-name="T2">(81/22) </text:span> ⲉⲩⲉⲓⲣⲉ ⲙ̅ⲙⲟϥ ⲛ̅ⲥⲣⲁϩ· ⲡⲏ‐ <text:line-break/><text:span text:style-name="T1"> </text:span><text:span text:style-name="T2">(81/23) </text:span> ⲉⲧⲁϥϣⲱⲡⲉ ⲕⲁⲧⲁ ⲡⲉϥⲉⲓⲛⲉ <text:line-break/><text:soft-page-break/><text:span text:style-name="T1"> </text:span><text:span text:style-name="T2">(81/24) </text:span> ⲁⲛⲁⲩ ⲇⲉ ⲉⲣⲟϥ ⲛ̅ⲙ̅ⲙⲁⲓ̈· ⲁⲛⲟⲕ <text:line-break/><text:span text:style-name="T1"> </text:span><text:span text:style-name="T2">(81/25) </text:span> ⲇⲉ ⲛ̅ⲧⲉⲣⲓⲛⲁⲩ ⲡⲉϫⲁⲓ̈ ϫⲉ <text:line-break/><text:span text:style-name="T1"> </text:span><text:span text:style-name="T2">(81/26) </text:span> ⲡϫⲟⲉⲓⲥ ⲙ̅ⲙ̅ⲛ̅ ⲗⲁⲁⲩ ⲛⲁⲩ ⲉ‐ <text:line-break/><text:span text:style-name="T1"> </text:span><text:span text:style-name="T2">(81/27) </text:span> ⲣⲟⲕ ⲙⲁⲣ̅ⲛ̅ⲡⲱⲧ ⲉⲃⲟⲗ ⲙ̅ⲡⲓ‐ <text:line-break/><text:span text:style-name="T1"> </text:span><text:span text:style-name="T2">(81/28) </text:span> ⲙⲁ· ⲛ̅ⲧⲟϥ ⲇⲉ ⲡⲉϫⲁϥ ⲛⲁⲓ̈ <text:line-break/><text:span text:style-name="T1"> </text:span><text:span text:style-name="T2">(81/29) </text:span> ϫⲉ ⲁⲉⲓϫⲟⲟⲥ ⲛⲁⲕ ϫⲉ ϩⲉⲛ <text:line-break/><text:span text:style-name="T1"> </text:span><text:span text:style-name="T2">(81/30) </text:span> ⲃ̅ⲗ̅ⲗⲉⲉⲩⲉ ⲁⲗⲟⲕ ϩⲁⲣⲟⲟⲩ· <text:line-break/><text:span text:style-name="T1"> </text:span><text:span text:style-name="T2">(81/31) </text:span> ⲁⲩⲱ ⲛ̅ⲧⲟⲕ ⲁⲛⲁⲩ ϫⲉ ⲡⲱ̣ⲥ <text:line-break/><text:span text:style-name="T1"> </text:span><text:span text:style-name="T2">(81/32) </text:span> ⲛ̅ⲥⲉⲉⲓⲙⲉ ⲁⲛ ⲉⲡⲏ ⲉⲧⲟ̣[ⲩ]ϫⲱ <text:line-break/><text:span text:style-name="T1"> </text:span><text:span text:style-name="T2">(82/1) </text:span> ⲙ̅ⲙⲟϥ· ⲡϣⲏⲣⲉ ⲅⲁⲣ ⲛ̅ⲧⲉ ⲡⲓ‐ <text:line-break/><text:span text:style-name="T1"> </text:span><text:span text:style-name="T2">(82/2) </text:span> ⲉⲟⲟⲩ ⲛ̅ⲧⲁⲩ· ⲉⲡⲙⲁ ⲙ̅ⲡⲁⲇⲓⲁ‐ <text:line-break/><text:span text:style-name="T1"> </text:span><text:span text:style-name="T2">(82/3) </text:span> ⲕⲱⲛ ⲁⲩⲁⲁϥ ⲛ̅ⲥⲧⲣⲁϩ· ⲁⲛⲟⲕ <text:line-break/><text:span text:style-name="T1"> </text:span><text:span text:style-name="T2">(82/4) </text:span> ⲇⲉ ⲁⲉⲓⲛⲁⲩ ⲉⲟⲩⲁ ⲉϥⲛⲁϩⲱⲛ <text:line-break/><text:span text:style-name="T1"> </text:span><text:span text:style-name="T2">(82/5) </text:span> ⲉⲣⲟⲛ ⲉϥⲉⲓⲛⲉ ⲙ̅ⲙⲟϥ ⲙ̅ⲛ̅ ⲡⲏ‐ <text:line-break/><text:span text:style-name="T1"> </text:span><text:span text:style-name="T2">(82/6) </text:span> ⲉⲛⲉϥⲥⲱⲃⲉ ϩ̅ⲓ̅ϫ̅ⲙ̅ ⲡⲓϣⲉ· <text:line-break/><text:span text:style-name="T1"> </text:span><text:span text:style-name="T2">(82/7) </text:span> ⲛⲉϥ〈ⲙ〉ⲏϩ ⲇⲉ ⲡⲉ ⲛ̅ϩⲣⲁⲓ̈ ϩ̅ⲛ̅ ⲟⲩ‐ <text:line-break/><text:span text:style-name="T1"> </text:span><text:span text:style-name="T2">(82/8) </text:span> ⲡ̅ⲛ̅ⲁ̅ ⲉϥⲟⲩⲁⲁⲃ ⲁⲩⲱ ⲛ̅ⲧⲟϥ 〈ⲡⲉ〉 ⲡⲓ‐ <text:line-break/><text:span text:style-name="T1"> </text:span><text:span text:style-name="T2">(82/9) </text:span> ⲥⲱⲧⲏⲣ· ⲛⲉⲩⲛ̅ ⲟⲩⲛⲟϭ ⲇⲉ <text:line-break/><text:span text:style-name="T1"> </text:span><text:span text:style-name="T2">(82/10) </text:span> ⲛ̅ⲟⲩⲟⲉⲓⲛ ⲉϥⲕⲱⲧⲉ ⲉⲣⲟⲟⲩ <text:line-break/><text:span text:style-name="T1"> </text:span><text:span text:style-name="T2">(82/11) </text:span> ⲛ̅ⲁⲧϣⲁϫⲉ ⲙ̅ⲙⲟϥ ⲙ̅ⲛ̅ ⲡⲁ‐ <text:line-break/><text:span text:style-name="T1"> </text:span><text:span text:style-name="T2">(82/12) </text:span> ϣⲁⲓ̈ ⲛ̅ⲧⲉ ϩⲉⲛⲁⲅⲅⲉⲗⲟⲥ ⲛ̅ⲁⲧ‐ <text:line-break/><text:span text:style-name="T1"> </text:span><text:span text:style-name="T2">(82/13) </text:span> ϣⲁϫⲉ ⲉⲣⲟⲟⲩ ⲁⲩⲱ ⲛ̅ⲁⲧⲛⲁⲩ‐ <text:line-break/><text:span text:style-name="T1"> </text:span><text:span text:style-name="T2">(82/14) </text:span> ⲉⲣⲟⲟⲩ ⲉⲩⲥⲙⲟⲩ ⲉⲣⲟⲟⲩ· <text:line-break/><text:span text:style-name="T1"> </text:span><text:span text:style-name="T2">(82/15) </text:span> ⲁⲛⲟⲕ ⲇⲉ ⲉⲧⲁⲓ̈ⲛⲁⲩ ⲉⲣⲟϥ ⲉⲩ‐ <text:line-break/><text:span text:style-name="T1"> </text:span><text:span text:style-name="T2">(82/16) </text:span> ⲟⲩⲱⲛ̅ϩ̅ ⲉⲃⲟⲗ ⲙ̅ⲡⲏ ⲉⲧϯ̣ ⲉⲟ‐ <text:line-break/><text:span text:style-name="T1"> </text:span><text:span text:style-name="T2">(82/17) </text:span> ⲟⲩ· ⲛ̅ⲧⲟϥ ⲇⲉ ⲡⲉϫⲁϥ ⲛⲁⲓ̈ ϫⲉ <text:line-break/><text:span text:style-name="T1"> </text:span><text:span text:style-name="T2">(82/18) </text:span> ϭ̅ⲙ̅ϭⲟⲙ· ⲛ̅ⲧⲟⲕ ⲅⲁⲣ ⲉⲧⲁⲩϯ <text:line-break/><text:span text:style-name="T1"> </text:span><text:span text:style-name="T2">(82/19) </text:span> ⲛⲁⲕ ⲛ̅ⲛⲉⲓ̈ⲙⲩⲥⲧⲏⲣⲓⲟⲛ ⲉ‐ <text:line-break/><text:span text:style-name="T1"> </text:span><text:span text:style-name="T2">(82/20) </text:span> ⲥⲟⲩⲱⲛⲟⲩ ϩ̅ⲛ̅ ⲟⲩⲱⲛ̅ϩ̅ ⲉⲃⲟⲗ· <text:line-break/><text:span text:style-name="T1"> </text:span><text:span text:style-name="T2">(82/21) </text:span> ϫⲉ ⲡⲏ ⲉⲧⲁⲩϯ ⲉⲓϥ̅ⲧ̅ ⲛⲁϥ ⲡⲓ‐ <text:line-break/><text:span text:style-name="T1"> </text:span><text:span text:style-name="T2">(82/22) </text:span> ϣⲟⲣ̅ⲡ̅ ⲙ̅ⲙⲓⲥⲉ ⲡⲉ ⲙ̅ⲛ̅ ⲡⲓⲏⲉⲓ <text:line-break/><text:span text:style-name="T1"> </text:span><text:span text:style-name="T2">(82/23) </text:span> ⲛ̅ⲧⲉ ⲛⲓⲇⲁⲓⲙⲱⲛ· ⲙ̅ⲛ̅ ⲡⲓⲕⲁⲡ <text:line-break/><text:span text:style-name="T1"> </text:span><text:span text:style-name="T2">(82/24) </text:span> ⲛ̅ⲱⲛⲓ ⲉϣⲁⲩϭⲱⲣ̅ϭ̅ ⲛ̅ϩⲏⲧ̅ϥ̅ <text:line-break/><text:span text:style-name="T1"> </text:span><text:span text:style-name="T2">(82/25) </text:span> ⲛ̅ⲧⲉ ⲉⲗ̅ⲱ̅ⲉ̅ⲓ̅ⲙ̅· ⲛ̅ⲧⲉ ⲡⲓⲥ̅xⲟⲥ̅ <text:line-break/><text:span text:style-name="T1"> </text:span><text:span text:style-name="T2">(82/26) </text:span> ⲉⲧϣⲟⲟⲡ ϩⲁ ⲡⲛⲟⲙⲟⲥ· ⲡⲏ‐ <text:line-break/><text:span text:style-name="T1"> </text:span><text:span text:style-name="T2">(82/27) </text:span> ⲇⲉ ⲉⲧⲁϩⲉⲣⲁⲧ̅ϥ̅ ⲉϥϩⲏⲛ ⲉⲣⲟϥ <text:line-break/><text:span text:style-name="T1"> </text:span><text:span text:style-name="T2">(82/28) </text:span> ⲡⲓⲥⲱⲧⲏ̅ⲣ̅ ⲡⲉ ⲉⲧⲟⲛ̅ϩ̅· ⲡⲓϣⲟ‐ <text:line-break/><text:span text:style-name="T1"> </text:span><text:span text:style-name="T2">(82/29) </text:span> ⲣ̅ⲡ̅ ⲛ̅ϩⲏⲧ̅ϥ̅ ⲉⲧⲁⲩⲁⲙⲁϩⲧⲉ ⲙ̅‐ <text:line-break/><text:span text:style-name="T1"> </text:span><text:span text:style-name="T2">(82/30) </text:span> ⲙⲟϥ· ⲁⲩⲱ ⲁⲩⲕⲁⲁϥ ⲉⲃⲟⲗ <text:line-break/><text:span text:style-name="T1"> </text:span><text:span text:style-name="T2">(82/31) </text:span> ⲉϥⲁ̣ϩⲉⲣⲁⲧ̅ϥ̅ ϩ̅ⲛ̅ ⲟⲩⲣⲁϣⲉ· <text:line-break/><text:span text:style-name="T1"> </text:span><text:span text:style-name="T2">(82/32) </text:span> ⲉ[ϥ]ⲛⲁⲩ ⲉⲛⲏ ⲉⲧⲁⲩϫⲓⲧ̅ϥ̅ ⲛ̅‐ <text:line-break/><text:span text:style-name="T1"> </text:span><text:span text:style-name="T2">(82/33) </text:span> ϭⲟ̣ⲛ̅ⲥ̅ ⲉⲩⲡⲟⲣ̅ϫ̅ ⲉⲃⲟⲗ ⲛ̅ⲛⲉⲩ̣ <text:line-break/><text:span text:style-name="T1"> </text:span><text:span text:style-name="T2">(83/1) </text:span> ⲉⲣⲏⲩ· ⲉⲧⲃⲉ ⲡⲁⲓ̈ ⲉϥⲥⲱⲃⲉ <text:line-break/><text:span text:style-name="T1"> </text:span><text:span text:style-name="T2">(83/2) </text:span> ⲛ̅ⲥⲁ ⲧⲉⲩⲙ̅ⲛ̅ⲧ̅ⲁⲧⲉⲓⲱⲣ̅ϩ̅· ⲉϥ‐ <text:line-break/><text:span text:style-name="T1"> </text:span><text:span text:style-name="T2">(83/3) </text:span> ⲥⲟⲟⲩⲛ ϫⲉ ϩⲉⲛⲃ̅ⲗ̅ⲗⲉ ⲙ̅ⲙⲓⲥⲉ‐ <text:line-break/><text:span text:style-name="T1"> </text:span><text:span text:style-name="T2">(83/4) </text:span> ⲛⲉ· ⲉϥⲉϣⲱⲡⲉ ⲟⲩⲛ ⲁⲣⲁ ⲛ̅‐ <text:line-break/><text:span text:style-name="T1"> </text:span><text:span text:style-name="T2">(83/5) </text:span> ϭⲓ ⲡⲓⲣⲉϥϫⲓ ⲙ̅ⲕⲁϩ ⲉⲡⲓⲥⲱⲙⲁ <text:line-break/><text:soft-page-break/><text:span text:style-name="T1"> </text:span><text:span text:style-name="T2">(83/6) </text:span> ⲡⲉ ϯϣⲉⲃⲓⲱ· ⲡⲏ ⲇⲉ ⲛ̅ⲧⲁⲩ‐ <text:line-break/><text:span text:style-name="T1"> </text:span><text:span text:style-name="T2">(83/7) </text:span> ⲕⲁⲁϥ ⲉⲃⲟⲗ ⲡⲁⲥⲱⲙⲁ ⲡⲉ ⲛ̅ⲁⲧ‐ <text:line-break/><text:span text:style-name="T1"> </text:span><text:span text:style-name="T2">(83/8) </text:span> ⲥⲱⲙⲁ· ⲁⲛⲟⲕ ⲇⲉ ⲡⲓⲛⲟⲉⲣⲟⲛ <text:line-break/><text:span text:style-name="T1"> </text:span><text:span text:style-name="T2">(83/9) </text:span> ⲙ̅ⲡ̅ⲛ̅ⲁ̅ ⲡⲁⲓ̈ ⲉⲧⲙⲉϩ ⲉⲃⲟⲗ ⲛ̅ⲟⲩ‐ <text:line-break/><text:span text:style-name="T1"> </text:span><text:span text:style-name="T2">(83/10) </text:span> ⲟⲉⲓⲛ ⲉϥⲡ̅ⲣ̅ⲉⲓⲱⲟⲩ ⲉⲃⲟⲗ· ⲡⲏ‐ <text:line-break/><text:span text:style-name="T1"> </text:span><text:span text:style-name="T2">(83/11) </text:span> ⲛ̅ⲧⲁⲕⲛⲁⲩ ⲉⲣⲟϥ ⲉϥⲛⲏⲩ ϣⲁ‐ <text:line-break/><text:span text:style-name="T1"> </text:span><text:span text:style-name="T2">(83/12) </text:span> ⲣⲟⲓ̈· ⲡⲓⲡⲗⲏⲣⲱⲙⲁ ⲛ̅ⲧⲁⲛ ⲡⲉ <text:line-break/><text:span text:style-name="T1"> </text:span><text:span text:style-name="T2">(83/13) </text:span> ⲛ̅ⲛⲟⲉⲣⲟⲛ· ⲡⲏ ⲉⲧⲛⲟⲩϩ̅ⲃ̅ ⲙ̅‐ <text:line-break/><text:span text:style-name="T1"> </text:span><text:span text:style-name="T2">(83/14) </text:span> ⲡⲓⲟⲩⲟⲉⲓⲛ ⲛ̅ⲧⲉⲗⲓⲟⲥ ⲙ̅ⲛ̅ ⲡⲓ <text:line-break/><text:span text:style-name="T1"> </text:span><text:span text:style-name="T2">(83/15) </text:span> ⲡ̅ⲛ̅ⲁ̅ ⲉⲧⲟⲩⲁⲁⲃ ⲛ̅ⲧⲁⲓ̈· ⲛⲁⲓ̈ ⲟⲩⲛ <text:line-break/><text:span text:style-name="T1"> </text:span><text:span text:style-name="T2">(83/16) </text:span> ⲉⲧⲁⲕⲛⲁⲩ ⲉⲣⲟⲟⲩ ⲉⲕⲉⲧⲁⲁⲩ <text:line-break/><text:span text:style-name="T1"> </text:span><text:span text:style-name="T2">(83/17) </text:span> ⲉⲧⲟⲟⲧⲟⲩ ⲛ̅ⲛⲓⲁⲗⲗⲟⲅⲉⲛⲏⲥ <text:line-break/><text:span text:style-name="T1"> </text:span><text:span text:style-name="T2">(83/18) </text:span> ⲉⲧⲉ ϩⲉⲛⲉⲃⲟⲗ ϩ̅ⲙ̅ ⲡⲓⲁⲓⲱⲛ ⲁⲛ <text:line-break/><text:span text:style-name="T1"> </text:span><text:span text:style-name="T2">(83/19) </text:span> ⲛⲉ· ⲟⲩ ⲅⲁⲣ ⲙ̅ⲙ̅ⲛ̅ ⲧⲁⲉⲓⲟ ⲛⲁ‐ <text:line-break/><text:span text:style-name="T1"> </text:span><text:span text:style-name="T2">(83/20) </text:span> ϣⲱⲡⲉ ⲛ̅ϩⲣⲁⲓ̈ ϩ̅ⲛ̅ ⲣⲱⲙⲉ ⲛⲓⲙ <text:line-break/><text:span text:style-name="T1"> </text:span><text:span text:style-name="T2">(83/21) </text:span> ⲉⲧⲉ ⲛ̅ϩⲉⲛⲁⲧⲙⲟⲩ ⲁⲛ ⲛⲉ· ⲉⲓ‐ <text:line-break/><text:span text:style-name="T1"> </text:span><text:span text:style-name="T2">(83/22) </text:span> ⲙⲏⲧⲓ ⲛⲏ ⲉⲧⲁⲩⲥⲱⲧ̅ⲡ̅ ⲙ̅ⲙⲟ‐ <text:line-break/><text:span text:style-name="T1"> </text:span><text:span text:style-name="T2">(83/23) </text:span> ⲟⲩ ⲉⲃⲟⲗ ϩ̅ⲛ̅ ⲟⲩⲟⲩⲥⲓⲁ ⲛ̅ⲛⲁⲧ <text:line-break/><text:span text:style-name="T1"> </text:span><text:span text:style-name="T2">(83/24) </text:span> ⲙⲟⲩ ⲧⲏ ⲉⲧⲁⲥⲟⲩⲱⲛ̅ϩ̅ ⲉⲃⲟⲗ <text:line-break/><text:span text:style-name="T1"> </text:span><text:span text:style-name="T2">(83/25) </text:span> ⲉⲥⲉ ⲛ̅ϭⲟⲙ ⲉϣⲱⲡ ⲉⲣⲟⲥ ⲙ̅ⲡⲏ <text:line-break/><text:span text:style-name="T1"> </text:span><text:span text:style-name="T2">(83/26) </text:span> ⲉⲧϯ ⲙ̅ⲡⲉϩⲟⲩⲟ ⲛ̅ⲧⲁϥ· ⲉⲧⲃⲉ <text:line-break/><text:span text:style-name="T1"> </text:span><text:span text:style-name="T2">(83/27) </text:span> ⲡⲁⲓ̈ ⲁⲉⲓϫⲟⲟⲥ ϫⲉ ⲟⲩⲟⲛ ⲛⲓⲙ <text:line-break/><text:span text:style-name="T1"> </text:span><text:span text:style-name="T2">(83/28) </text:span> ⲉⲧⲉ ⲟⲩⲛ̅ⲧⲁϥ ⲥⲉⲛⲁϯ ⲛⲁϥ ⲁⲩ‐ <text:line-break/><text:span text:style-name="T1"> </text:span><text:span text:style-name="T2">(83/29) </text:span> ⲱ ⲟⲩⲟⲛ ⲛⲁⲣ̅ ϩⲟⲩⲟ ⲉⲣⲟϥ· ⲡⲏ <text:line-break/><text:span text:style-name="T1"> </text:span><text:span text:style-name="T2">(83/30) </text:span> ⲇⲉ ⲉⲧⲉ ⲙ̅ⲙ̅ⲛ̅ⲧⲁϥ ⲉⲧⲉ ⲡⲁⲓ̈ ⲡⲉ <text:line-break/><text:span text:style-name="T1"> </text:span><text:span text:style-name="T2">(83/31) </text:span> ⲡⲓⲣⲱⲙⲉ ⲛ̅ⲧⲉ ⲡⲓⲧⲟⲡⲟⲥ ⲉϥ‐ <text:line-break/><text:span text:style-name="T1"> </text:span><text:span text:style-name="T2">(83/32) </text:span> ϣⲟⲟⲡ ⲧⲏⲣ̅ϥ̅ ⲉϥⲙⲟⲟⲩⲧ̣ ⲉϥ‐ <text:line-break/><text:span text:style-name="T1"> </text:span><text:span text:style-name="T2">(83/33) </text:span> ⲟⲩⲟⲧ̅ⲃ̅ ⲉⲃⲟⲗ ϩ̅ⲙ̅ ⲡⲓⲧⲱϭ[ⲉ] ⲛ̅‐ <text:line-break/><text:span text:style-name="T1"> </text:span><text:span text:style-name="T2">(83/34) </text:span> ⲧⲉ ⲡⲓⲥⲱⲛ̅ⲧ̅ ⲛ̅ⲧⲉ ⲡⲓϫⲡ[ⲟ] <text:line-break/><text:span text:style-name="T1"> </text:span><text:span text:style-name="T2">(84/1) </text:span> ⲉⲧⲉ ⲉϣⲱⲡⲉ ⲉⲣϣⲁⲛⲟⲩⲁ <text:line-break/><text:span text:style-name="T1"> </text:span><text:span text:style-name="T2">(84/2) </text:span> ⲟⲩⲱⲛ̅ϩ̅ ⲉⲃⲟⲗ ⲛ̅ⲧⲉ ϯⲟⲩⲥⲓⲁ <text:line-break/><text:span text:style-name="T1"> </text:span><text:span text:style-name="T2">(84/3) </text:span> ⲛʹ262ⲛⲁⲧⲙⲟⲩ̣ ϣⲁⲩⲙⲉⲉⲩⲉ ϫⲉ <text:line-break/><text:span text:style-name="T1"> </text:span><text:span text:style-name="T2">(84/4) </text:span> ⲥⲉⲁⲙⲁϩⲧⲉ ⲙ̅ⲙⲟϥ· ⲥⲉⲛⲁϥⲓ‐ <text:line-break/><text:span text:style-name="T1"> </text:span><text:span text:style-name="T2">(84/5) </text:span> ⲧ̅ϥ̅ ⲛ̅ⲧⲟⲟⲧ̅ϥ̅· ⲁⲩⲱ ⲥⲉⲛⲁⲟⲩ‐ <text:line-break/><text:span text:style-name="T1"> </text:span><text:span text:style-name="T2">(84/6) </text:span> ⲁϩ̅ϥ̅ ⲉⲡⲏ ⲉⲧϣⲟⲟⲡ· ⲛ̅ⲧⲟⲕ <text:line-break/><text:span text:style-name="T1"> </text:span><text:span text:style-name="T2">(84/7) </text:span> ⲟⲩⲛ ⲧⲁϫⲣⲟ ⲛ̅ϩⲏⲧ ⲁⲩⲱ ⲙ̅ⲡ̅ⲣ̅ <text:line-break/><text:span text:style-name="T1"> </text:span><text:span text:style-name="T2">(84/8) </text:span> ⲣ̅ ϩⲟⲧⲉ ⲗⲁⲁⲩ· ϯⲛⲁϣⲱⲡⲉ ⲅⲁⲣ <text:line-break/><text:span text:style-name="T1"> </text:span><text:span text:style-name="T2">(84/9) </text:span> ⲛ̅ⲙ̅ⲙⲁⲕ ϫⲉⲕⲁⲁⲥ ⲛ̅ⲛⲉⲗⲁⲁⲩ <text:line-break/><text:span text:style-name="T1"> </text:span><text:span text:style-name="T2">(84/10) </text:span> ⲛ̅ⲧⲉ ⲛⲉⲕϫⲁϫⲉ ϭ̅ⲙ̅ϭⲟⲙ ⲉⲣⲟⲕ· <text:line-break/><text:span text:style-name="T1"> </text:span><text:span text:style-name="T2">(84/11) </text:span> ϯⲣⲏⲛⲏ ⲛⲁⲕ ϭ̅ⲙ̅ⲛⲟⲙⲧⲉ· ⲛⲁⲓ̈ <text:line-break/><text:span text:style-name="T1"> </text:span><text:span text:style-name="T2">(84/12) </text:span> ⲛ̅ⲧⲁϥϫⲟⲟⲩ ⲁϥϣⲱⲡⲉϩ ⲣⲁⲓ̈ ⲛ̅‐ <text:line-break/><text:span text:style-name="T1"> </text:span><text:span text:style-name="T2">(84/13) </text:span> ϩⲏⲧ̅ϥ̅· <text:line-break/><text:span text:style-name="T1"> </text:span><text:span text:style-name="T2">(84/14) </text:span> ⲁⲡⲟⲕⲁⲗⲩⲯⲓⲥ ⲡⲉⲧⲣⲟⲩ </text:p>
      <text:p text:style-name="P1"/>
      <text:p text:style-name="P4">( codex VII ) The Teachings of Silvanus</text:p>
      <text:p text:style-name="P5"><text:span text:style-name="T1"> </text:span><text:span text:style-name="T2">(84/15) </text:span> ⲛ̅ⲥⲃ̣ⲟⲩ ⲛ̅ⲥⲓⲗⲟⲩⲁⲛⲟⲥ· <text:line-break/><text:span text:style-name="T1"> </text:span><text:span text:style-name="T2">(84/16) </text:span> ⲃⲱⲗ ⲉⲃⲟⲗ ⲛ̅ϩⲏⲗⲓϭⲓⲁ ⲛⲓⲙ ⲙ̅ⲙ̅ⲛ̅ⲧ̅’̅‐ <text:line-break/><text:span text:style-name="T1"> </text:span><text:span text:style-name="T2">(84/17) </text:span> ϣⲏⲙ· ⲛ̅ⲅ̅ϫⲡⲟ ⲛⲁⲕ ⲛ̅ⲧⲙ̅ⲛⲧ’̅‐ <text:line-break/><text:span text:style-name="T1"> </text:span><text:span text:style-name="T2">(84/18) </text:span> ϫⲱⲣⲉ ⲙ̅ⲡⲛⲟⲩⲥ ⲙ̅ⲛ̅ ⲧⲯⲩⲭⲏ <text:line-break/><text:span text:style-name="T1"> </text:span><text:span text:style-name="T2">(84/19) </text:span> ⲛ̅ⲅ̅ⲧⲁϫⲣⲟ ⲙ̅ⲡ̅ⲡⲟⲗⲉⲙⲟⲥ ⲟⲩⲃⲉ <text:line-break/><text:span text:style-name="T1"> </text:span><text:span text:style-name="T2">(84/20) </text:span> ⲙⲛ̅ⲧ̅’̅ⲁⲑⲏⲧ’ ⲛⲓⲙ ⲛ̅ⲧⲉ ⲙ̅ⲡⲁⲑⲟⲥ <text:line-break/><text:span text:style-name="T1"> </text:span><text:span text:style-name="T2">(84/21) </text:span> ⲙ̅ⲡⲉⲣⲱⲥ ⲙ̅ⲛ̅ ⲧⲡⲟⲛⲏⲣⲓⲁ ⲉⲑⲟ‐ <text:line-break/><text:span text:style-name="T1"> </text:span><text:span text:style-name="T2">(84/22) </text:span> ⲟⲩ· ⲁⲩⲱ ⲧⲙ̅ⲛ̅ⲧ̅’̅ⲙⲁⲉⲓⲉⲟⲟⲩ <text:line-break/><text:span text:style-name="T1"> </text:span><text:span text:style-name="T2">(84/23) </text:span> ⲁⲩⲱ ⲧⲙ̅ⲛ̅ⲧ̅’̅ⲙⲁⲉⲓϯⲧⲱⲛ· ⲙ̅ⲛ̅ <text:line-break/><text:span text:style-name="T1"> </text:span><text:span text:style-name="T2">(84/24) </text:span> ⲡⲕⲱϩ ⲉⲧ’ϩⲟⲥⲉ ⲙ̅ⲛ̅ ⲡϭⲱⲛⲧ̅’̅ <text:line-break/><text:span text:style-name="T1"> </text:span><text:span text:style-name="T2">(84/25) </text:span> ⲙ̅ⲛ̅ ⲧⲟⲣⲅⲏ· ⲙ̅ⲛ̅ ⲧⲉⲡⲓⲑⲩⲙⲓⲁ <text:line-break/><text:span text:style-name="T1"> </text:span><text:span text:style-name="T2">(84/26) </text:span> ⲙ̅ⲙ̅ⲛ̅ⲧ̅’̅ⲙⲁⲉⲓⲭⲣⲏⲙⲁ· ⲣⲟⲉⲓⲥ ⲉ‐ <text:line-break/><text:span text:style-name="T1"> </text:span><text:span text:style-name="T2">(84/27) </text:span> ⲧⲉⲧ̅ⲛ̅ⲡⲁⲣⲉⲙⲃⲟⲗⲏ ⲙ̅ⲛ̅ ϩⲉⲛϩⲟ‐ <text:line-break/><text:span text:style-name="T1"> </text:span><text:span text:style-name="T2">(84/28) </text:span> ⲡⲗⲟⲛ ⲙ̅ⲛ̅ ϩⲉⲛⲃⲉⲣⲏϩ· ϩⲱⲕ ⲙ̅‐ <text:line-break/><text:span text:style-name="T1"> </text:span><text:span text:style-name="T2">(84/29) </text:span> ⲙⲟⲕ ⲙ̅ⲛ̅ ⲙ̅ⲙⲁⲧⲟⲉⲓ ⲧⲏⲣⲟⲩ ⲉ‐ <text:line-break/><text:span text:style-name="T1"> </text:span><text:span text:style-name="T2">(84/30) </text:span> ⲧⲉ̣ ⲛ̣̅ⲗⲟⲅⲟⲥ ⲛⲉ· ⲙ̅ⲛ̅ ⲛ̅ⲁⲣⲭⲱⲛ <text:line-break/><text:span text:style-name="T1"> </text:span><text:span text:style-name="T2">(84/31) </text:span> ⲉ[ⲧ]ⲉ ⲛ̅ϣⲟϫⲛⲉ ⲛⲉ ⲙ̅ⲛ̅ ⲡⲉⲕ‐ <text:line-break/><text:span text:style-name="T1"> </text:span><text:span text:style-name="T2">(85/1) </text:span> ⲛⲟⲩⲥ ⲛ̅ϩⲏⲅⲉⲙⲟⲛⲓⲕⲟⲛ· ⲡⲁ‐ <text:line-break/><text:span text:style-name="T1"> </text:span><text:span text:style-name="T2">(85/2) </text:span> ϣⲏⲣⲉ ⲛⲟⲩϫⲉ ⲛ̅ⲗⲏⲥⲧⲏⲥ ⲛⲓⲙ <text:line-break/><text:span text:style-name="T1"> </text:span><text:span text:style-name="T2">(85/3) </text:span> ⲉⲃⲟⲗ ϩ̅ⲛ̅ ⲛⲉⲕⲡⲩⲗⲏ· ⲁⲣⲓⲧⲏⲣⲉⲓ <text:line-break/><text:span text:style-name="T1"> </text:span><text:span text:style-name="T2">(85/4) </text:span> ⲛ̅ⲛⲉⲕⲡⲩⲗⲏ ⲧⲏⲣⲟⲩ ϩ̅ⲛ̅ ϩⲉⲛⲫⲁ‐ <text:line-break/><text:span text:style-name="T1"> </text:span><text:span text:style-name="T2">(85/5) </text:span> ⲛⲟⲥ ⲉⲧⲉ ⲛ̅ⲗⲟⲅⲟⲥ ⲛⲉ· ⲁⲩⲱ <text:line-break/><text:span text:style-name="T1"> </text:span><text:span text:style-name="T2">(85/6) </text:span> ⲕⲛⲁϫⲡⲟ ⲛ̅ⲛⲁⲓ̈ ⲧⲏⲣⲟⲩ ⲛ̅ⲛⲟⲩⲃⲓ‐ <text:line-break/><text:span text:style-name="T1"> </text:span><text:span text:style-name="T2">(85/7) </text:span> ⲟⲥ ⲉϥⲥϭⲣⲁϩ̅ⲧ̅’̅· ⲡⲉⲧⲛⲁⲁⲣⲉϩ ⲇⲉ <text:line-break/><text:span text:style-name="T1"> </text:span><text:span text:style-name="T2">(85/8) </text:span> ⲉⲛⲁⲓ̈ ⲁⲛ ϥⲛⲁϣⲱⲡⲉ ⲛ̅ⲑⲉ ⲛ̅ⲟⲩ‐ <text:line-break/><text:span text:style-name="T1"> </text:span><text:span text:style-name="T2">(85/9) </text:span> ⲡⲟⲗⲓⲥ ⲉⲥⲉ ⲛ̅ⲉⲣⲏⲙⲟⲥ ⲉⲁⲩϫⲓ‐ <text:line-break/><text:span text:style-name="T1"> </text:span><text:span text:style-name="T2">(85/10) </text:span> ⲧ̅ⲥ̅· ⲁⲛⲑⲏⲣⲓⲟⲛ ⲧⲏⲣⲟⲩ ⲣ̅ⲕⲁⲧⲁ‐ <text:line-break/><text:span text:style-name="T1"> </text:span><text:span text:style-name="T2">(85/11) </text:span> ⲡⲁⲧⲉⲓ ⲙ̅ⲙⲟⲥ· ϩⲉⲛⲑⲏⲣⲓⲟⲛ <text:line-break/><text:span text:style-name="T1"> </text:span><text:span text:style-name="T2">(85/12) </text:span> ⲅⲁⲣ ⲉⲑⲟⲟⲩ ⲛⲉ ⲙ̅ⲙⲉⲉⲩⲉ ⲉⲧ’ <text:line-break/><text:span text:style-name="T1"> </text:span><text:span text:style-name="T2">(85/13) </text:span> ⲛⲁⲛⲟⲩⲟⲩ ⲁⲛ· ⲁⲩⲱ ⲧⲉⲕⲡⲟ‐ <text:line-break/><text:span text:style-name="T1"> </text:span><text:span text:style-name="T2">(85/14) </text:span> ⲗⲓⲥ ⲛⲁⲙⲟⲩϩ ⲛ̅ⲗⲏⲥⲧⲏⲥ· ⲛ̅ⲅ̅ <text:line-break/><text:span text:style-name="T1"> </text:span><text:span text:style-name="T2">(85/15) </text:span> ⲛⲁϣϫⲡⲟ ⲛⲁⲕ ⲁⲛ ⲛ̅ⲟⲩⲉⲓⲣⲏⲛⲏ <text:line-break/><text:span text:style-name="T1"> </text:span><text:span text:style-name="T2">(85/16) </text:span> ⲉⲓⲙⲏⲧⲓ ⲁϩⲉⲛⲑⲏⲣⲓⲟⲛ ⲧⲏⲣⲟⲩ <text:line-break/><text:span text:style-name="T1"> </text:span><text:span text:style-name="T2">(85/17) </text:span> ⲛ̅ⲁⲓⲣⲓⲟⲛ· ⲫⲁⲩⲗⲟⲥ ⲉⲧⲟ ⲛ̅ⲧⲩ‐ <text:line-break/><text:span text:style-name="T1"> </text:span><text:span text:style-name="T2">(85/18) </text:span> ⲣⲁⲛⲛⲟⲥ· ϥⲟ ⲛ̅ϫⲟⲉⲓⲥ ⲉⲛⲁⲓ̈· ⲉϥ <text:line-break/><text:span text:style-name="T1"> </text:span><text:span text:style-name="T2">(85/19) </text:span> ⲣ̅ ϩ̅ⲙ̅ⲙⲉ ⲙ̅ⲡⲁⲓ̈ ϥϣⲟⲟⲡ ϩⲁ ⲡⲛⲟϭ <text:line-break/><text:span text:style-name="T1"> </text:span><text:span text:style-name="T2">(85/20) </text:span> ⲛ̅ⲃⲟⲣⲃⲟⲣⲟⲥ· ⲧⲡⲟⲗⲓⲥ ⲧⲏⲣ̅ⲥ̅ <text:line-break/><text:span text:style-name="T1"> </text:span><text:span text:style-name="T2">(85/21) </text:span> ⲛⲁⲧⲁⲕⲟ ⲉⲧⲉ ⲧⲉⲕⲯⲩⲭⲏ ⲧⲉ <text:line-break/><text:span text:style-name="T1"> </text:span><text:span text:style-name="T2">(85/22) </text:span> ⲥⲁϩⲱ ⲉⲃⲟⲗ ⲛ̅ⲛⲁⲓ̈ ⲧⲏⲣⲟⲩ ⲱ̅ <text:line-break/><text:span text:style-name="T1"> </text:span><text:span text:style-name="T2">(85/23) </text:span> ⲧⲯⲩⲭⲏ ⲛ̅ⲧⲁⲗⲁⲓⲡⲱⲣⲟⲥ· ⲁ‐ <text:line-break/><text:span text:style-name="T1"> </text:span><text:span text:style-name="T2">(85/24) </text:span> ⲛⲓⲛⲉ ⲉϩⲟⲩⲛ ⲛⲉ ⲙ̅ⲡⲉϩⲏⲅⲟⲩ <text:line-break/><text:span text:style-name="T1"> </text:span><text:span text:style-name="T2">(85/25) </text:span> ⲙⲉⲛⲟⲥ· ⲡⲉⲥⲁϩ ⲫⲏⲅⲟⲩⲙⲉ <text:line-break/><text:span text:style-name="T1"> </text:span><text:span text:style-name="T2">(85/26) </text:span> ⲛⲟⲥ ⲙⲉⲛ ⲡⲉ ⲡⲛⲟⲩⲥ· ⲡⲥⲁϩ ⲇⲉ <text:line-break/><text:span text:style-name="T1"> </text:span><text:span text:style-name="T2">(85/27) </text:span> ⲡⲉ ⲡⲗⲟⲅⲟⲥ· ⲁⲩⲱ ⲥⲉⲛⲁⲛ̅ⲧⲉ <text:line-break/><text:span text:style-name="T1"> </text:span><text:span text:style-name="T2">(85/28) </text:span> ⲉⲃⲟⲗ ϩ̅ⲙ̅ ⲡⲧⲁⲕⲟ ⲙ̅ⲛ̅ ⲛ̅ϭⲓⲛⲇⲩ‐ <text:line-break/><text:span text:style-name="T1"> </text:span><text:span text:style-name="T2">(85/29) </text:span> ⲛⲟⲥ· ⲥⲱⲧ̅ⲙ̅ ⲡⲁϣⲏⲣⲉ ⲉⲧⲁ <text:line-break/><text:span text:style-name="T1"> </text:span><text:span text:style-name="T2">(85/30) </text:span> ⲥⲩⲙⲃⲟⲩⲗⲓⲁ· ⲙ̅ⲡ̅ⲣ̅ϯ ⲧⲉⲕ̣ϫⲓⲥⲉ <text:line-break/><text:soft-page-break/><text:span text:style-name="T1"> </text:span><text:span text:style-name="T2">(85/31) </text:span> [ⲉ]ⲛ̣ⲉⲕϫⲁϫⲉ ⲉⲕⲡⲏⲧ’· ⲁⲗⲗ[ⲁ] ⲙⲁⲗ‐ <text:line-break/><text:span text:style-name="T1"> </text:span><text:span text:style-name="T2">(85/32) </text:span> [ⲗⲟ]ⲛ ⲡⲱⲧ’ ⲛ̅ⲥⲁ ⲛⲁⲓ̈ ϩⲱⲥ̣ [ϫ]ⲱ̣ⲣⲉ̣ <text:line-break/><text:span text:style-name="T1"> </text:span><text:span text:style-name="T2">(86/1) </text:span> ⲙ̅ⲡ̅ⲣ̅ϣⲱⲡⲉ ⲛ̅ⲧⲃ̅ⲛⲏ ⲉⲣⲉ’ⲛ̅←ⲣⲱ‐ <text:line-break/><text:span text:style-name="T1"> </text:span><text:span text:style-name="T2">(86/2) </text:span> ⲙⲉ ⲡⲏⲧ’ ⲛ̅ⲥⲱⲕ· ⲁⲗⲗⲁ ϣⲱ‐ <text:line-break/><text:span text:style-name="T1"> </text:span><text:span text:style-name="T2">(86/3) </text:span> ⲡⲉ ⲛ̅ⲧⲟϥ ⲛ̅ⲣⲱⲙⲉ ⲉⲕⲡⲏⲧ’ ⲛ̅‐ <text:line-break/><text:span text:style-name="T1"> </text:span><text:span text:style-name="T2">(86/4) </text:span> ⲥⲁ ⲛ̅ⲑⲏⲣⲓⲟⲛ ⲉⲑⲟⲟⲩ· ⲙⲏⲡⲱⲥ <text:line-break/><text:span text:style-name="T1"> </text:span><text:span text:style-name="T2">(86/5) </text:span> ⲛ̅ⲥⲉϫⲣⲟ ⲉⲣⲟⲕ ⲁⲩⲱ ⲛ̅ⲥⲉⲣ̅ⲕⲁ‐ <text:line-break/><text:span text:style-name="T1"> </text:span><text:span text:style-name="T2">(86/6) </text:span> ⲧⲁⲡⲁⲧⲉⲓ ⲙ̅ⲙⲟⲕ ϩⲱⲥ ⲣⲉϥⲙⲟ <text:line-break/><text:span text:style-name="T1"> </text:span><text:span text:style-name="T2">(86/7) </text:span> ⲟⲩⲧ’· ⲛ̅ⲅ̅ⲱϫ̅ⲛ̅ ⲉⲃⲟⲗ ϩ̅ⲓ̅ⲧⲟⲟⲧ̅ⲥ̅ <text:line-break/><text:span text:style-name="T1"> </text:span><text:span text:style-name="T2">(86/8) </text:span> ⲛ̅ⲧⲟⲩⲙ̅ⲛ̅ⲧ̅’̅ⲡⲉⲧ’ϩⲟⲟⲩ· ⲱ̅ ⲡⲧⲁ‐ <text:line-break/><text:span text:style-name="T1"> </text:span><text:span text:style-name="T2">(86/9) </text:span> ⲗⲁⲓⲡⲱⲣⲟⲥ ⲡⲣⲱⲙⲉ ⲟⲩ ⲡⲉⲧ̅ⲕ̅‐ <text:line-break/><text:span text:style-name="T1"> </text:span><text:span text:style-name="T2">(86/10) </text:span> ⲛⲁⲁⲁϥ ⲉⲕϣⲁⲛϩⲉ ⲉϩⲣⲁⲓ̈ ⲉⲛⲟⲩ <text:line-break/><text:span text:style-name="T1"> </text:span><text:span text:style-name="T2">(86/11) </text:span> ϭⲓϫ· ⲁⲣⲓⲧⲏⲣⲓ ⲙ̅ⲙⲟⲕ ⲟⲩⲁⲁⲕ <text:line-break/><text:span text:style-name="T1"> </text:span><text:span text:style-name="T2">(86/12) </text:span> ⲙⲏⲡⲟⲧⲉ ⲛ̅ⲥⲉⲧⲁⲁⲕ ⲉⲧ̅ⲛ̅ⲛⲉⲕ <text:line-break/><text:span text:style-name="T1"> </text:span><text:span text:style-name="T2">(86/13) </text:span> ϫⲁϫⲉ· ⲧⲁⲁⲕ ⲛ̅ⲧⲟⲟⲧⲟⲩ ⲙ̅ⲡⲉⲓ̈ <text:line-break/><text:span text:style-name="T1"> </text:span><text:span text:style-name="T2">(86/14) </text:span> ⲥⲟⲉⲓϣ ⲛ̅ϣⲃⲏⲣ ⲥⲛⲁⲩ· ⲡⲗⲟⲅⲟⲥ <text:line-break/><text:span text:style-name="T1"> </text:span><text:span text:style-name="T2">(86/15) </text:span> ⲙ̅ⲛ̅ ⲡⲛⲟⲩⲥ· ⲁⲩⲱ ⲙ̅ⲙ̅ⲛ̅ ⲗⲁⲁⲩ <text:line-break/><text:span text:style-name="T1"> </text:span><text:span text:style-name="T2">(86/16) </text:span> ⲛⲁϫⲣⲟ ⲉⲣⲟⲕ· ⲙⲁⲣⲉⲡⲛⲟⲩⲧⲉ <text:line-break/><text:span text:style-name="T1"> </text:span><text:span text:style-name="T2">(86/17) </text:span> ϩⲙⲟⲟⲥ ϩ̅ⲛ̅ ⲧⲉⲕⲡⲁⲣⲉⲙⲃⲟⲗⲏ <text:line-break/><text:span text:style-name="T1"> </text:span><text:span text:style-name="T2">(86/18) </text:span> ⲛ̅ⲧⲉ ⲡⲉϥⲡⲛ̅ⲁ̅ ϩⲁⲣⲉϩ ⲉⲛⲉⲕⲡⲩ‐ <text:line-break/><text:span text:style-name="T1"> </text:span><text:span text:style-name="T2">(86/19) </text:span> ⲗⲏ· ⲡⲛⲟⲩⲥ ⲛ̅ⲧⲙ̅ⲛ̅ⲧ̅’̅ⲛⲟⲩⲧⲉ <text:line-break/><text:span text:style-name="T1"> </text:span><text:span text:style-name="T2">(86/20) </text:span> ⲛϥ̅ϩⲁⲣⲉϩ ⲉⲛⲥⲟⲃⲉⲧ’· ⲡⲗⲟⲅⲟⲥ <text:line-break/><text:span text:style-name="T1"> </text:span><text:span text:style-name="T2">(86/21) </text:span> ⲉⲧⲟⲩⲁⲁⲃ ⲙⲁⲣⲉϥϣⲱⲡⲉ ⲙ̅‐ <text:line-break/><text:span text:style-name="T1"> </text:span><text:span text:style-name="T2">(86/22) </text:span> ⲫⲁⲛⲟⲥ ⲙ̅ⲡⲉⲕⲛⲟⲩⲥ ⲉϥⲣⲱⲕ̅ϩ̅ <text:line-break/><text:span text:style-name="T1"> </text:span><text:span text:style-name="T2">(86/23) </text:span> ⲛ̅ⲛ̅ϣⲉ ⲉⲧⲉ ⲡⲛⲟⲃⲉ ⲧⲏⲣ̅ϥ̅ ⲡⲉ· <text:line-break/><text:span text:style-name="T1"> </text:span><text:span text:style-name="T2">(86/24) </text:span> ⲉⲕϣⲁⲛⲣ̅ ⲛⲁⲓ̈ ⲇⲉ ⲱ̅ ⲡⲁϣⲏⲣⲉ <text:line-break/><text:span text:style-name="T1"> </text:span><text:span text:style-name="T2">(86/25) </text:span> ⲕⲛⲁϫⲣⲟ ⲉⲛⲉⲕϫⲁϫⲉ ⲧⲏⲣⲟⲩ· <text:line-break/><text:span text:style-name="T1"> </text:span><text:span text:style-name="T2">(86/26) </text:span> ⲁⲩⲱ ⲛ̅ⲥⲉⲛⲁϣⲣ̅ ⲡⲟⲗⲉⲙⲟⲥ <text:line-break/><text:span text:style-name="T1"> </text:span><text:span text:style-name="T2">(86/27) </text:span> ⲁⲛ ⲉϩⲏⲧ̅ⲕ̅· ⲟⲩⲇⲉ ⲛ̅ⲥⲉⲛⲁϣ‐ <text:line-break/><text:span text:style-name="T1"> </text:span><text:span text:style-name="T2">(86/28) </text:span> ⲱϩⲉ ⲁⲛ ⲉⲣⲁⲧⲟⲩ· ⲟⲩⲇⲉ ⲛ̅ⲥⲉ‐ <text:line-break/><text:span text:style-name="T1"> </text:span><text:span text:style-name="T2">(86/29) </text:span> ⲛⲁϣⲉⲓ ⲁⲛ ⲉⲧⲉⲕϩ̅ⲓ̅ⲏ ⲉⲕϣⲁⲛ‐ <text:line-break/><text:span text:style-name="T1"> </text:span><text:span text:style-name="T2">(86/30) </text:span> ϭ̅ⲛ̅ ⲛⲁⲓ̈ ⲅⲁⲣ ⲕⲛⲁⲣ̅ⲕⲁⲧⲁⲫⲣⲟⲛⲓ <text:line-break/><text:span text:style-name="T1"> </text:span><text:span text:style-name="T2">(86/31) </text:span> ⲙ̅ⲙⲟⲟⲩ ⲛ̅ⲑⲉ ⲛ̅ⲛⲓϭⲁⲗⲙⲉⲥ <text:line-break/><text:span text:style-name="T1"> </text:span><text:span text:style-name="T2">(86/32) </text:span> ⲥ[ⲉ]ⲛⲁϣⲁϫⲉ ⲛ̅ⲙ̅ⲙⲁⲕ ⲉⲩ[ⲕⲱ]‐ <text:line-break/><text:span text:style-name="T1"> </text:span><text:span text:style-name="T2">(86/33) </text:span> ⲣ[̅ϣ̅] ⲉⲣⲟⲕ ⲉⲩⲥⲟⲡⲥ̅ⲡ̅ ⲉⲩⲣ̅ [ϩⲟ]‐ <text:line-break/><text:span text:style-name="T1"> </text:span><text:span text:style-name="T2">(87/1) </text:span> ⲧⲉ ⲁⲛ ϩⲏⲧ̅ⲕ̅ ⲁⲗⲗⲁ ⲉⲩⲣ̅ ϩⲟⲧⲉ ϩⲏ‐ <text:line-break/><text:span text:style-name="T1"> </text:span><text:span text:style-name="T2">(87/2) </text:span> ⲧⲟⲩ ⲛ̅ⲛⲉⲧⲟⲩⲏϩ ϩⲣⲁⲓ̈ ⲛ̅ϩⲏⲧ̅ⲕ̅ <text:line-break/><text:span text:style-name="T1"> </text:span><text:span text:style-name="T2">(87/3) </text:span> ⲉⲧⲉ ⲛ̅ⲣⲉϥⲣⲟⲉⲓⲥ ⲛⲉ ⲛ̅ⲧⲙ̅ⲛ̅ⲧ̅‐ <text:line-break/><text:span text:style-name="T1"> </text:span><text:span text:style-name="T2">(87/4) </text:span> ⲛⲟⲩⲧⲉ ⲙ̅ⲛ̅ ⲧⲉⲥⲃⲱ· ⲡⲁϣⲏⲣⲉ <text:line-break/><text:span text:style-name="T1"> </text:span><text:span text:style-name="T2">(87/5) </text:span> ϫⲓ ⲉⲣⲟⲕ ⲛ̅ⲧⲡⲁⲓⲇⲓⲁ ⲙ̅ⲛ̅ ⲧⲉⲥⲃⲱ <text:line-break/><text:span text:style-name="T1"> </text:span><text:span text:style-name="T2">(87/6) </text:span> ⲙ̅ⲡ̅ⲣ̅ⲡⲱⲧ’ ⲉⲃⲟⲗ ⲛ̅ⲧⲡⲁⲓⲇⲓⲁ ⲙ̅ⲛ̅ <text:line-break/><text:span text:style-name="T1"> </text:span><text:span text:style-name="T2">(87/7) </text:span> ⲧⲉⲥⲃⲱ· ⲁⲗⲗⲁ ⲉⲩϣⲁⲛϯ ⲥⲃⲱ <text:line-break/><text:span text:style-name="T1"> </text:span><text:span text:style-name="T2">(87/8) </text:span> ⲛⲁⲕ ϫⲓ ⲉⲣⲟⲕ ⲙ̅ⲡⲣⲁϣⲉ· ⲁⲩⲱ ⲉⲩ‐ <text:line-break/><text:span text:style-name="T1"> </text:span><text:span text:style-name="T2">(87/9) </text:span> ϣⲁⲛⲡⲁⲓⲇⲉⲩⲉ ⲙ̅ⲙⲟⲕ ϩ̅ⲛ̅ ϩⲱⲃ <text:line-break/><text:span text:style-name="T1"> </text:span><text:span text:style-name="T2">(87/10) </text:span> ⲛⲓⲙ ϣⲱⲡⲉ ⲉⲕⲣ̅ ⲡⲉⲧⲛⲁⲛⲟⲩϥ· <text:line-break/><text:span text:style-name="T1"> </text:span><text:span text:style-name="T2">(87/11) </text:span> ⲕⲛⲁϣⲱⲛ̅ⲧ̅’̅ ⲛ̅ⲟⲩⲕⲗⲟⲙ ⲙ̅ⲡⲁⲓ‐ <text:line-break/><text:span text:style-name="T1"> </text:span><text:span text:style-name="T2">(87/12) </text:span> ⲇⲉⲓⲁ ⲙ̅ⲡⲉⲕϩⲏⲅⲉⲙⲟⲛⲓⲕⲟⲛ· <text:line-break/><text:soft-page-break/><text:span text:style-name="T1"> </text:span><text:span text:style-name="T2">(87/13) </text:span> ⲧⲉⲥⲃⲱ ⲉⲧⲟⲩⲁⲁⲃ ⲧⲁⲁⲥ ϩ̅ⲓ̅ⲱⲱⲕ <text:line-break/><text:span text:style-name="T1"> </text:span><text:span text:style-name="T2">(87/14) </text:span> ϩⲱⲥ ⲥⲧⲟⲗⲏ· ⲁⲁⲕ ⲛ̅ⲉⲩⲅⲉⲛⲏⲥ <text:line-break/><text:span text:style-name="T1"> </text:span><text:span text:style-name="T2">(87/15) </text:span> ϩ̅ⲛ̅ ⲧⲡⲟⲗⲓⲧⲉⲓⲁ ⲉⲧⲛⲁⲛⲟⲩⲥ· <text:line-break/><text:span text:style-name="T1"> </text:span><text:span text:style-name="T2">(87/16) </text:span> ⲕⲱ ⲛⲁⲕ ⲛ̅ⲧ̅’̅ⲧⲥⲩⲫⲏ ⲛ̅ⲧⲙ̅ⲛⲧ’̅‐ <text:line-break/><text:span text:style-name="T1"> </text:span><text:span text:style-name="T2">(87/17) </text:span> ⲉⲩⲧⲁⲕⲧⲟⲥ· ⲁⲣⲓⲕⲣⲓⲛⲉ ⲙ̅ⲙⲟⲕ <text:line-break/><text:span text:style-name="T1"> </text:span><text:span text:style-name="T2">(87/18) </text:span> ⲟⲩⲁⲁⲕ· ϩⲱⲥ ⲣⲉϥϯ ϩⲁⲡ ⲛ̅ⲥⲟ‐ <text:line-break/><text:span text:style-name="T1"> </text:span><text:span text:style-name="T2">(87/19) </text:span> ⲫⲟⲥ· ⲙ̅ⲡ̅ⲣ̅ⲥⲱⲣ̅ⲙ̅ ⲛ̅ⲧⲁⲥⲃⲱ <text:line-break/><text:span text:style-name="T1"> </text:span><text:span text:style-name="T2">(87/20) </text:span> ⲛ̅ⲅ̅ϫⲡⲟ ⲛⲁⲕ ⲛ̅ⲟⲩⲙ̅ⲛⲧ’̅ⲁⲧⲥⲃⲱ <text:line-break/><text:span text:style-name="T1"> </text:span><text:span text:style-name="T2">(87/21) </text:span> ⲙⲏⲡⲱⲥ ⲛ̅ⲅ̅ⲥⲱⲣ̅ⲙ̅ ⲙ̅ⲡⲉⲕⲗⲁ‐ <text:line-break/><text:span text:style-name="T1"> </text:span><text:span text:style-name="T2">(87/22) </text:span> ⲟⲥ· ⲙ̅ⲡ̅ⲣ̅ⲡⲱⲧ’ ⲉⲃⲟⲗ ⲙ̅ⲡ̅ⲑⲉⲓ‐ <text:line-break/><text:span text:style-name="T1"> </text:span><text:span text:style-name="T2">(87/23) </text:span> ⲟⲛ ⲙ̅ⲛ̅ ⲧⲉⲥⲃⲱ ⲉⲧ’ϣⲟⲟⲡ ϩⲣⲁⲓ̈ <text:line-break/><text:span text:style-name="T1"> </text:span><text:span text:style-name="T2">(87/24) </text:span> ⲛ̅ϩⲏⲧ̅ⲕ̅· ⲛ̅ⲧⲟϥ ⲅⲁⲣ ⲉⲧⲧⲥⲁⲃⲟ <text:line-break/><text:span text:style-name="T1"> </text:span><text:span text:style-name="T2">(87/25) </text:span> ⲙ̅ⲙⲟⲕ ϥⲙⲉ ⲙ̅ⲙⲟⲕ ⲉⲙⲁⲧⲉ <text:line-break/><text:span text:style-name="T1"> </text:span><text:span text:style-name="T2">(87/26) </text:span> ϥⲛⲁⲕⲱ ⲅⲁⲣ ⲛⲁⲕ ⲛ̅ⲛⲟⲩⲥⲧⲩⲫⲏ <text:line-break/><text:span text:style-name="T1"> </text:span><text:span text:style-name="T2">(87/27) </text:span> ⲉⲥⲙ̅ⲡϣⲁ· ⲧⲫⲩⲥⲓⲥ ⲛ̅ⲧ̅ⲃ̅ⲛⲏ <text:line-break/><text:span text:style-name="T1"> </text:span><text:span text:style-name="T2">(87/28) </text:span> ⲉⲧ̅ⲛ̅ϩⲣⲁⲓ̈ ⲛ̅ϩⲏⲧ̅ⲕ̅ ⲛⲟϫ̅ⲥ̅ ⲉⲃⲟⲗ <text:line-break/><text:span text:style-name="T1"> </text:span><text:span text:style-name="T2">(87/29) </text:span> ⲙ̅ⲙⲟⲕ· ⲁⲩⲱ ⲡⲗⲟⲅⲓⲥⲙⲟⲥ ⲙ̅‐ <text:line-break/><text:span text:style-name="T1"> </text:span><text:span text:style-name="T2">(87/30) </text:span> ⲫⲁⲩⲗⲟⲥ ⲙ̅ⲡ̅ⲣ̅ⲕⲁⲁϥ ⲉϩⲟⲩⲛ <text:line-break/><text:span text:style-name="T1"> </text:span><text:span text:style-name="T2">(87/31) </text:span> ⲉⲣⲟⲕ· ⲉⲛⲉⲥⲟⲩⲡⲱϩ ⲅⲁⲣ ⲉⲕ‐ <text:line-break/><text:span text:style-name="T1"> </text:span><text:span text:style-name="T2">(87/32) </text:span> ⲥⲟⲟⲩⲛ ⲛ̅ⲑⲉ ⲉϯϯ ⲥⲃⲱ ⲛ̣ⲁⲕ <text:line-break/><text:span text:style-name="T1"> </text:span><text:span text:style-name="T2">(87/33) </text:span> ⲉϣϫⲉ ⲛⲁⲛⲟⲩⲥ ⲉⲁⲣⲭⲉⲓ [ⲉ]ⲛ̣ϩⲟ‐ <text:line-break/><text:span text:style-name="T1"> </text:span><text:span text:style-name="T2">(87/34) </text:span> [ⲣⲁⲧ]ⲟ̣ⲛ ⲛ̅ⲑⲉ ⲉⲧ̅ⲕ̅ⲛⲁⲩ ⲉⲣ[ⲟ]ⲥ <text:line-break/><text:span text:style-name="T1"> </text:span><text:span text:style-name="T2">(87/35) </text:span> [ⲡⲟⲥ]ⲱ͂ ⲙⲁⲗⲗⲟⲛ ϥⲥⲟⲧ̅ⲡ̅ [ⲉⲧ]ⲣⲉ̣ⲕ̣ <text:line-break/><text:span text:style-name="T1"> </text:span><text:span text:style-name="T2">(88/1) </text:span> ⲁⲣⲭⲉⲓ ⲉⲟⲩⲟⲛ ⲛⲓⲙ ⲉⲕⲟ ⲛ̅ⲛⲟϭ <text:line-break/><text:span text:style-name="T1"> </text:span><text:span text:style-name="T2">(88/2) </text:span> ⲉϫⲛ̅ ⲥⲟⲟⲩϩ̅ⲥ̅ ⲛⲓⲙ ⲁⲩⲱ ⲗⲁⲟⲥ <text:line-break/><text:span text:style-name="T1"> </text:span><text:span text:style-name="T2">(88/3) </text:span> ⲛⲓⲙ· ⲁⲩⲱ ⲛ̅ϫⲓⲥⲉ ⲙ̅ⲙⲓⲛⲉ ⲛⲓⲙ <text:line-break/><text:span text:style-name="T1"> </text:span><text:span text:style-name="T2">(88/4) </text:span> ⲙ̅ⲛ̅ ⲟⲩⲗⲟⲅⲟⲥ ⲛ̅ⲑⲉⲓⲟⲥ· ⲉⲁⲕ‐ <text:line-break/><text:span text:style-name="T1"> </text:span><text:span text:style-name="T2">(88/5) </text:span> ϣⲱⲡⲉ ⲛ̅ϫⲟⲉⲓⲥ ⲉϫ̅ⲛ̅ ⲇⲩⲛⲁⲙⲓⲥ <text:line-break/><text:span text:style-name="T1"> </text:span><text:span text:style-name="T2">(88/6) </text:span> ⲛⲓⲙ ⲛ̅ϩⲁⲧ̅ⲃ̅ ⲯⲩⲭⲏ· ⲡⲁϣⲏⲣⲉ ⲙⲏ‐ <text:line-break/><text:span text:style-name="T1"> </text:span><text:span text:style-name="T2">(88/7) </text:span> ϣⲁⲣⲉ ⲗⲁⲁⲩ ⲣ̅ⲉⲡⲓⲑⲩⲙⲉⲓ ⲉⲣ̅ ϩ̅ⲙ̅‐ <text:line-break/><text:span text:style-name="T1"> </text:span><text:span text:style-name="T2">(88/8) </text:span> ϩⲁⲗ· ⲡⲱⲥ ⲛ̅ⲧⲟⲕ ⲕϣⲧⲟⲣⲧⲣ̅ ⲙ̅‐ <text:line-break/><text:span text:style-name="T1"> </text:span><text:span text:style-name="T2">(88/9) </text:span> ⲙⲟⲕ ⲕⲁⲕⲱⲥ· ⲡⲁϣⲏⲣⲉ ⲙ̅ⲡ̅ⲣ̅ <text:line-break/><text:span text:style-name="T1"> </text:span><text:span text:style-name="T2">(88/10) </text:span> ⲣ̅ ϩⲟⲧⲉ ϩⲏⲧ̅ϥ̅ ⲛ̅ⲗⲁⲁⲩ ⲉⲓⲙⲏⲧⲓ ⲉ‐ <text:line-break/><text:span text:style-name="T1"> </text:span><text:span text:style-name="T2">(88/11) </text:span> ⲡⲛⲟⲩⲧⲉ ⲙⲁⲩⲁⲁϥ ⲡⲉⲧ’ϫⲟⲥⲉ· <text:line-break/><text:span text:style-name="T1"> </text:span><text:span text:style-name="T2">(88/12) </text:span> ⲧⲙ̅ⲛ̅ⲧ̅’̅ⲡⲁⲛⲟⲩⲣⲅⲟⲥ ⲙ̅ⲡⲇⲓⲁⲃⲟⲗⲟⲥ <text:line-break/><text:span text:style-name="T1"> </text:span><text:span text:style-name="T2">(88/13) </text:span> ⲛⲟϫ̅ⲥ̅ ⲥⲁⲃⲟⲗ ⲙ̅ⲙⲟⲕ· ϫⲓ ⲙ̅ⲡⲟⲩ‐ <text:line-break/><text:span text:style-name="T1"> </text:span><text:span text:style-name="T2">(88/14) </text:span> ⲟⲉⲓⲛ ⲛ̅ⲛⲉⲕⲃⲁⲗ̓ ⲛ̅ⲅ̅ⲛⲟⲩϫⲉ ⲉⲃⲟⲗ <text:line-break/><text:span text:style-name="T1"> </text:span><text:span text:style-name="T2">(88/15) </text:span> ⲙ̅ⲙⲟⲕ ⲙ̅ⲡⲕⲁⲕⲉ· ⲁⲣⲓⲡⲟⲗⲓⲧⲉⲩⲉ <text:line-break/><text:span text:style-name="T1"> </text:span><text:span text:style-name="T2">(88/16) </text:span> ϩ̅ⲙ̅ ⲡⲉⲭ̅ⲥ̅· ⲁⲩⲱ ⲕⲛⲁϫⲡⲟ ⲛⲁⲕ <text:line-break/><text:span text:style-name="T1"> </text:span><text:span text:style-name="T2">(88/17) </text:span> ⲛ̅ⲛⲟⲩⲁϩⲟ ϩ̅ⲛ̅ ⲧⲡⲉ· ⲙ̅ⲡ̅ⲣ̅ϣⲱ‐ <text:line-break/><text:span text:style-name="T1"> </text:span><text:span text:style-name="T2">(88/18) </text:span> ⲡⲉ ⲙ̅ⲙⲟⲛ ⲑⲩⲗⲟⲥ ⲛ̅ϩⲁϩ ⲛ̅ϩⲱⲃ <text:line-break/><text:span text:style-name="T1"> </text:span><text:span text:style-name="T2">(88/19) </text:span> ⲉⲙ̅ⲛ̅ ϩⲏⲩ ⲛ̅ϩⲏⲧⲟⲩ· ⲁⲩⲱ ⲙ̅ⲡ̅ⲣ̅‐ <text:line-break/><text:span text:style-name="T1"> </text:span><text:span text:style-name="T2">(88/20) </text:span> ϣⲱⲡⲉ ⲛ̅ⲣⲉϥϫⲓ ⲙⲟⲉⲓⲧ’ ϩⲏⲧⲥ̅ <text:line-break/><text:span text:style-name="T1"> </text:span><text:span text:style-name="T2">(88/21) </text:span> ⲛ̅ⲧⲉⲕⲙ̅ⲛ̅ⲧ̅’̅ⲁⲧ’ⲥⲟⲟⲩⲛ ⲉⲧⲟ ⲛ̅‐ <text:line-break/><text:span text:style-name="T1"> </text:span><text:span text:style-name="T2">(88/22) </text:span> ⲃ̅ⲗ̅ⲗⲏ· ⲡⲁϣⲏⲣⲉ ⲥⲱⲧ̅ⲙ̅ ⲉⲧⲁ <text:line-break/><text:span text:style-name="T1"> </text:span><text:span text:style-name="T2">(88/23) </text:span> ⲥⲃⲱ ⲉⲛⲁⲛⲟⲩⲥ ⲉⲧⲟ ⲛ̅ⲭ̅ⲣ̅ⲥ̅· <text:line-break/><text:span text:style-name="T1"> </text:span><text:span text:style-name="T2">(88/24) </text:span> ⲁⲩⲱ ⲛ̅ⲅ̅ⲗⲁϭⲉ ⲉⲫⲓⲛⲏⲃ ⲉⲧϩⲟ‐ <text:line-break/><text:soft-page-break/><text:span text:style-name="T1"> </text:span><text:span text:style-name="T2">(88/25) </text:span> ⲣ̅ϣ̅ ⲉϫⲱⲕ· ⲁⲙⲟⲩ ⲉⲃⲟⲗ ϩ̅ⲛ̅ ⲧⲃ̅‐ <text:line-break/><text:span text:style-name="T1"> </text:span><text:span text:style-name="T2">(88/26) </text:span> ϣⲉ ⲧⲁⲓ̈ ⲉⲧ’ⲙⲟⲩϩ ⲙ̅ⲙⲟⲕ ⲛ̅ⲕⲁ‐ <text:line-break/><text:span text:style-name="T1"> </text:span><text:span text:style-name="T2">(88/27) </text:span> ⲕⲉ· ⲛ̅ⲑⲉ ⲉⲛⲉ ⲙ̅ⲙ̅ⲛ̅ ϭⲟⲙ ⲙ̅ⲙⲟⲕ <text:line-break/><text:span text:style-name="T1"> </text:span><text:span text:style-name="T2">(88/28) </text:span> ⲉⲣ̅ ϩⲱⲃ ⲛⲓⲙ ⲛⲉⲓ̈ⲛⲁϫⲟⲟⲩ ⲁⲛ <text:line-break/><text:span text:style-name="T1"> </text:span><text:span text:style-name="T2">(88/29) </text:span> ⲛⲁⲕ ⲡⲉ· ⲁⲡⲉⲭ̅ⲥ̅ ⲇⲉ ⲉⲓ ⲉϯ ⲛⲁⲕ <text:line-break/><text:span text:style-name="T1"> </text:span><text:span text:style-name="T2">(88/30) </text:span> ⲛ̅ⲧⲉⲉⲓ ⲇⲱⲣⲉⲁ ⲉⲧⲃⲉ ⲟⲩ ⲉⲕ‐ <text:line-break/><text:span text:style-name="T1"> </text:span><text:span text:style-name="T2">(88/31) </text:span> ⲡⲏⲧ’ ⲛ̅ⲥⲁ ⲡⲕⲁⲕⲉ ⲉⲣⲉⲡⲟⲩⲟ‐ <text:line-break/><text:span text:style-name="T1"> </text:span><text:span text:style-name="T2">(88/32) </text:span> ⲉⲓⲛ ⲕⲏ ⲛⲁⲕ ⲉϩⲣⲁⲓ̈· ⲉⲧⲃⲉ ⲟⲩ‐ <text:line-break/><text:span text:style-name="T1"> </text:span><text:span text:style-name="T2">(88/33) </text:span> ⲉⲕⲥⲱ ⲛ̅ⲟⲩⲙⲟⲟⲩ ⲉϥϩⲟⲟⲩ <text:line-break/><text:span text:style-name="T1"> </text:span><text:span text:style-name="T2">(88/34) </text:span> ⲉ[ⲣ]ⲉⲡⲉⲧ’ϩⲟⲗ̅ϭ̅ ⲕⲏ ⲛⲁⲕ ⲉ̣[ϩⲣⲁⲓ̈]· <text:line-break/><text:span text:style-name="T1"> </text:span><text:span text:style-name="T2">(88/35) </text:span> ⲧⲥ̣[ⲟ]ⲫⲓⲁ ⲣ̅ⲡⲁⲣⲁⲕⲁⲗⲉⲓ ⲙ̅[ⲙⲟⲕ] <text:line-break/><text:span text:style-name="T1"> </text:span><text:span text:style-name="T2">(89/1) </text:span> ⲁⲩⲱ ⲕⲟⲩⲱϣ ⲧⲙ̅ⲛ̅ⲧ̅’̅ⲁⲑⲏⲧ <text:line-break/><text:span text:style-name="T1"> </text:span><text:span text:style-name="T2">(89/2) </text:span> ϩⲙ̅ ⲡⲉⲕⲟⲩⲱϣ ⲁⲛ ⲉⲕⲉⲓⲣⲉ <text:line-break/><text:span text:style-name="T1"> </text:span><text:span text:style-name="T2">(89/3) </text:span> ⲛ̅ⲛⲁⲓ̈· ⲁⲗⲗⲁ ⲧⲫⲩⲥⲓⲥ ⲛ̅ⲧⲃ̅ⲛⲏ <text:line-break/><text:span text:style-name="T1"> </text:span><text:span text:style-name="T2">(89/4) </text:span> ⲉⲧ̅ⲛ̅ϩⲏⲧ̅ⲕ̅ ⲡⲉⲧ’ⲉⲓⲣⲉ ⲛ̅ⲛⲁⲓ̈· <text:line-break/><text:span text:style-name="T1"> </text:span><text:span text:style-name="T2">(89/5) </text:span> ⲧⲥⲟⲫⲓⲁ ⲣ̅ⲡⲁⲣⲁⲕⲁⲗⲉⲓ ⲙ̅ⲙⲟⲕ <text:line-break/><text:span text:style-name="T1"> </text:span><text:span text:style-name="T2">(89/6) </text:span> ϩⲛ̅ ⲧⲉⲥⲙ̅ⲛ̅ⲧ̅’̅ⲭ̅ⲥ̅ ⲉⲥϫⲱ ⲙ̅ⲙⲟⲥ <text:line-break/><text:span text:style-name="T1"> </text:span><text:span text:style-name="T2">(89/7) </text:span> ϫⲉ ⲁⲙⲏⲉⲓⲧ̅ⲛ̅ ϣⲁⲣⲟⲓ̈ ⲧⲏⲣⲧ̅ⲛ̅ <text:line-break/><text:span text:style-name="T1"> </text:span><text:span text:style-name="T2">(89/8) </text:span> ⲱ͂ ⲛⲁⲑⲏⲧ’ ⲛ̅ⲧⲉⲧ̅ⲛ̅ϫⲓ ⲛ̅ⲟⲩ‐ <text:line-break/><text:span text:style-name="T1"> </text:span><text:span text:style-name="T2">(89/9) </text:span> ⲇⲱⲣⲉⲁ ⲧⲙ̅ⲛ̅ⲧⲣ̅ⲙ̅ⲛ̅ϩⲏⲧ’ ⲉⲧ‐ <text:line-break/><text:span text:style-name="T1"> </text:span><text:span text:style-name="T2">(89/10) </text:span> ⲛⲁⲛⲟⲩⲥ ⲉⲧ’ⲥⲟⲧ̅ⲡ̅· ϯϯ ⲛⲁⲕ <text:line-break/><text:span text:style-name="T1"> </text:span><text:span text:style-name="T2">(89/11) </text:span> ⲛ̅ⲟⲩⲥⲭⲏⲙⲁ ⲛ̅ⲁⲣⲭⲓⲉⲣⲉⲩⲥ <text:line-break/><text:span text:style-name="T1"> </text:span><text:span text:style-name="T2">(89/12) </text:span> ⲉϥⲥⲁϩ̅ⲧ̅’̅ ϩ̅ⲛ̅ ⲥⲟⲫⲓⲁ ⲛⲓⲙ· ⲁϣ‐ <text:line-break/><text:span text:style-name="T1"> </text:span><text:span text:style-name="T2">(89/13) </text:span> ⲡⲉ ⲡⲙⲟⲩ ⲉⲑⲟⲟⲩ ⲉⲓⲙⲏⲧⲓ ⲁⲧ‐ <text:line-break/><text:span text:style-name="T1"> </text:span><text:span text:style-name="T2">(89/14) </text:span> ⲙ̅ⲛ̅ⲧ̅’̅ⲁⲧ’ⲥⲟⲟⲩⲛ· ⲁϣ ⲡⲉ ⲡⲕⲁ‐ <text:line-break/><text:span text:style-name="T1"> </text:span><text:span text:style-name="T2">(89/15) </text:span> ⲕⲉ ⲉⲑⲟⲟⲩ ⲉⲓⲙⲏⲧⲓ ⲁⲧ‐ <text:line-break/><text:span text:style-name="T1"> </text:span><text:span text:style-name="T2">(89/16) </text:span> ⲙ̅ⲛ̅ⲧ̅ⲁⲧⲥⲟⲟⲩⲛ· ⲁϣ ⲡⲉ ⲡⲕ‐ <text:line-break/><text:span text:style-name="T1"> </text:span><text:span text:style-name="T2">(89/17) </text:span> ⲕⲉ ⲉⲑⲟⲟⲩ ⲉⲓⲙⲏⲧⲓ ⲉⲡⲥⲟⲟⲩⲛ <text:line-break/><text:span text:style-name="T1"> </text:span><text:span text:style-name="T2">(89/18) </text:span> ⲛ̅ⲧⲃ̅ϣⲉ· ⲛⲟⲩϫⲉ ⲙ̅ⲡⲉⲕⲣⲟⲟⲩϣ <text:line-break/><text:span text:style-name="T1"> </text:span><text:span text:style-name="T2">(89/19) </text:span> ⲉⲡⲛⲟⲩⲧⲉ ⲟⲩⲁⲁϥ· ⲙ̅ⲡ̅ⲣ̅ϣⲱ‐ <text:line-break/><text:span text:style-name="T1"> </text:span><text:span text:style-name="T2">(89/20) </text:span> ⲡⲉ ⲉⲕⲙⲉ ⲙ̅ⲡⲛⲟⲩⲃ ⲙ̅ⲛ̅ ⲡϩⲁⲧ <text:line-break/><text:span text:style-name="T1"> </text:span><text:span text:style-name="T2">(89/21) </text:span> ⲛⲁⲓ̈ ⲉⲙ̅ⲛ̅ ϩⲏⲩ ⲛ̅ϩⲏⲧⲟⲩ· ⲁⲗⲗⲁ <text:line-break/><text:span text:style-name="T1"> </text:span><text:span text:style-name="T2">(89/22) </text:span> ϭⲱⲗⲉ ⲙ̅ⲙⲟⲕ ⲛ̅ⲧⲥⲟⲫⲓⲁ ⲛ̅ⲑⲉ <text:line-break/><text:span text:style-name="T1"> </text:span><text:span text:style-name="T2">(89/23) </text:span> ⲛ̅ⲛⲓⲥⲧⲟⲗⲏ· ⲁⲩⲱ ⲧⲉⲡⲓⲥⲧⲏ‐ <text:line-break/><text:span text:style-name="T1"> </text:span><text:span text:style-name="T2">(89/24) </text:span> ⲙⲏ ⲛ̅ⲅ̅’̅ⲧⲁⲁⲥ ⲉϫⲱⲕ ⲛ̅ⲑⲉ ⲛ̅ⲛⲓ‐ <text:line-break/><text:span text:style-name="T1"> </text:span><text:span text:style-name="T2">(89/25) </text:span> ⲕⲗⲟⲙ· ϩⲙⲟⲟⲥ ϩ̅ⲓ̅ϫ̅ⲛ̅ ⲟⲩⲑⲣⲟ‐ <text:line-break/><text:span text:style-name="T1"> </text:span><text:span text:style-name="T2">(89/26) </text:span> ⲛⲟⲥ ⲛ̅ⲁⲓⲥⲑⲏⲥⲓⲥ· ϫⲉ ⲛⲁⲓ̈ ⲛⲟⲩⲕ‐ <text:line-break/><text:span text:style-name="T1"> </text:span><text:span text:style-name="T2">(89/27) </text:span> ⲛⲉ ⲉⲕⲛⲁϫⲓⲧⲟⲩ ⲟⲛ ⲙ̅ⲡⲥⲁ ⲛ‐ <text:line-break/><text:span text:style-name="T1"> </text:span><text:span text:style-name="T2">(89/28) </text:span> ϩⲣⲉ ⲛ̅ⲕⲉⲥⲟⲡ· ⲟⲩⲣⲱⲙⲉ ⲅⲁⲣ <text:line-break/><text:span text:style-name="T1"> </text:span><text:span text:style-name="T2">(89/29) </text:span> ⲛ̅ⲁⲑⲏⲧ’ ϣⲁϥϯ ϩ̅ⲓ̅ⲱⲱϥ ⲛ̅ⲧⲙ̅ⲛⲧ’̅‐ <text:line-break/><text:span text:style-name="T1"> </text:span><text:span text:style-name="T2">(89/30) </text:span> ⲁⲑⲏⲧ’ ⲛ̅ⲑⲉ ⲛ̅ⲛⲓⲥⲧⲟⲗⲏ· ⲁⲩⲱ <text:line-break/><text:span text:style-name="T1"> </text:span><text:span text:style-name="T2">(89/31) </text:span> ⲛ̅ⲑⲉ ⲛ̅ⲛⲓϣⲧⲏⲛ ⲙ̅ⲡⲉⲛⲑⲟⲥ <text:line-break/><text:span text:style-name="T1"> </text:span><text:span text:style-name="T2">(89/32) </text:span> ⲉϥϯ ϩ̅ⲓ̅ⲱⲱϥ ⲙ̅ⲡϣⲓⲡⲉ· ⲁⲩⲱ <text:line-break/><text:span text:style-name="T1"> </text:span><text:span text:style-name="T2">(89/33) </text:span> ϣⲁϥϯ ⲕⲗⲟⲙ ⲉϫⲱϥ ϩ̅ⲛ̅ ⲟⲩⲙ̅ⲛⲧ’̅‐ <text:line-break/><text:span text:style-name="T1"> </text:span><text:span text:style-name="T2">(89/34) </text:span> ⲁⲧ’ⲥⲟⲟⲩⲛ· ⲁⲩⲱ ⲛ̅ϥ̅ϩⲙⲟⲟⲥ <text:line-break/><text:span text:style-name="T1"> </text:span><text:span text:style-name="T2">(89/35) </text:span> ϩ̅ⲓ̅ϫ̅ⲛ̣̅ ⲟⲩⲑⲣⲟⲛⲟⲥ ⲙ̅ⲙⲛ̅ⲧ’̣ⲁⲧ’ <text:line-break/><text:span text:style-name="T1"> </text:span><text:span text:style-name="T2">(89/36) </text:span> [ⲉⲓⲙⲉ] ⲉϥϣⲟⲟⲡ ⲅⲁⲣ ⲙ̣̅[ⲡⲉ]ⲧ̣ⲟ̣‐ <text:line-break/><text:soft-page-break/><text:span text:style-name="T1"> </text:span><text:span text:style-name="T2">(90/1) </text:span> ϥⲥⲱⲣ̅ⲙ̅ ⲙ̅ⲙⲟϥ ⲟⲩⲁⲁϥ· ⲥⲉⲣ̅‐ <text:line-break/><text:span text:style-name="T1"> </text:span><text:span text:style-name="T2">(90/2) </text:span> ϩ̅ⲙ̅ⲙⲉ ⲅⲁⲣ ⲙ̅ⲙⲟϥ ϩ̅ⲓ̅ⲧ̅ⲛ̅ ⲧⲙ̅ⲛⲧ’̅‐ <text:line-break/><text:span text:style-name="T1"> </text:span><text:span text:style-name="T2">(90/3) </text:span> ⲁⲧ’ⲥⲟⲟⲩⲛ· ⲁⲩⲱ ϣⲁϥⲣ̅ ⲛⲉϩ̅ⲓ̅‐ <text:line-break/><text:span text:style-name="T1"> </text:span><text:span text:style-name="T2">(90/4) </text:span> ⲟⲟⲩⲉ ⲛ̅ⲧⲉⲡⲓⲑⲩⲙⲓⲁ ⲙ̅ⲡⲁⲑⲟⲥ <text:line-break/><text:span text:style-name="T1"> </text:span><text:span text:style-name="T2">(90/5) </text:span> ⲛⲓⲙ· ϥⲛⲏⲃⲉ ϩ̅ⲛ̅ ⲛⲉⲡⲓⲑⲩⲙⲓⲁ <text:line-break/><text:span text:style-name="T1"> </text:span><text:span text:style-name="T2">(90/6) </text:span> ⲙ̅ⲡⲃⲓⲟⲥ· ⲁⲩⲱ ⲁϥⲃⲱⲕ ⲛ̅ⲛ̅ⲙ̅ⲧⲱ· <text:line-break/><text:span text:style-name="T1"> </text:span><text:span text:style-name="T2">(90/7) </text:span> ⲉϥⲙⲉⲉⲩⲉ ⲙⲉⲛ ϫⲉ ϥϭ̅ⲛ̅ ϩⲏⲟⲩ <text:line-break/><text:span text:style-name="T1"> </text:span><text:span text:style-name="T2">(90/8) </text:span> ⲉϥⲉⲓⲣⲉ ⲛ̅ⲛⲉϩⲃⲏⲩⲉ ⲧⲏⲣⲟⲩ <text:line-break/><text:span text:style-name="T1"> </text:span><text:span text:style-name="T2">(90/9) </text:span> ⲉⲧⲉ ⲙ̅ⲙ̅ⲛ̅ ϩⲏⲩ ⲛ̅ϩⲏⲧⲟⲩ· ⲡⲣⲱ‐ <text:line-break/><text:span text:style-name="T1"> </text:span><text:span text:style-name="T2">(90/10) </text:span> ⲙⲉ ⲛ̅ⲧⲁⲗⲁⲓⲡⲱⲣⲟⲥ ⲉⲧ’ⲃⲏⲕ <text:line-break/><text:span text:style-name="T1"> </text:span><text:span text:style-name="T2">(90/11) </text:span> ϩ̅ⲛ̅ ⲛⲁⲓ̈ ⲧⲏⲣⲟⲩ ϥⲛⲁⲙⲟⲩ· ⲉⲃⲟⲗ <text:line-break/><text:span text:style-name="T1"> </text:span><text:span text:style-name="T2">(90/12) </text:span> ϫⲉ ⲙ̅ⲙ̅ⲛ̅ⲧⲁϥ ⲙ̅ⲙⲁⲩ ⲙ̅ⲡⲛⲟⲩⲥ <text:line-break/><text:span text:style-name="T1"> </text:span><text:span text:style-name="T2">(90/13) </text:span> ⲡⲣⲉϥⲣ̅ ϩ̅ⲙ̅ⲙⲉ· ⲁⲗⲗⲁ ⲉϥⲧ̅ⲛ̅ⲧⲱⲛ <text:line-break/><text:span text:style-name="T1"> </text:span><text:span text:style-name="T2">(90/14) </text:span> ⲉⲩϫⲟⲉⲓ· ⲉⲣⲉⲡⲧⲏⲩ ⲛⲟⲩϫⲉ <text:line-break/><text:span text:style-name="T1"> </text:span><text:span text:style-name="T2">(90/15) </text:span> ⲙ̅ⲙⲟϥ ⲛ̅ⲥⲁ ⲉⲥⲁ· ⲁⲩⲱ ⲛ̅ⲑⲉ ⲛ̅‐ <text:line-break/><text:span text:style-name="T1"> </text:span><text:span text:style-name="T2">(90/16) </text:span> ⲟⲩϩⲧⲟ ⲉⲁϥⲣ̅ ⲃⲟⲗ̓ ⲉⲙ̅ⲛ̅ⲧⲁϥ ⲏ%0 <text:line-break/><text:span text:style-name="T1"> </text:span><text:span text:style-name="T2">(90/17) </text:span> ⲛⲓⲟⲭⲟⲥ ⲙ̅ⲙⲁⲩ· ⲁⲡⲁⲓ̈ ⲅⲁⲣ ⲣ̅ <text:line-break/><text:span text:style-name="T1"> </text:span><text:span text:style-name="T2">(90/18) </text:span> ϣⲧⲁ ⲙ̅ⲡⲏⲛⲓⲟⲭⲟⲥ ⲉⲧⲉ ⲡⲗⲟ‐ <text:line-break/><text:span text:style-name="T1"> </text:span><text:span text:style-name="T2">(90/19) </text:span> ⲅⲟⲥ ⲡⲉ· ⲁϥⲥⲱⲣ̅ⲙ̅ ⲅⲁⲣ ⲛ̅ϭⲓ ⲡⲧⲁ‐ <text:line-break/><text:span text:style-name="T1"> </text:span><text:span text:style-name="T2">(90/20) </text:span> ⲗⲁⲓⲡⲱⲣⲟⲥ ϫⲉ ⲙ̅ⲡⲉϥⲟⲩⲱϣ <text:line-break/><text:span text:style-name="T1"> </text:span><text:span text:style-name="T2">(90/21) </text:span> ⲥⲩⲙⲃⲟⲩⲗⲓⲁ· ⲁⲩⲛⲟϫ̅ϥ̅ ⲉⲡⲓⲥⲁ <text:line-break/><text:span text:style-name="T1"> </text:span><text:span text:style-name="T2">(90/22) </text:span> ⲉⲡⲁⲓ̈ ϩ̅ⲓ̅ⲧⲙ̅ ⲡⲓϣⲟⲙⲉⲧ’ ⲛ̅ⲥⲟⲩ‐ <text:line-break/><text:span text:style-name="T1"> </text:span><text:span text:style-name="T2">(90/23) </text:span> ⲃⲱⲱⲛ· ⲁϥϫⲡⲉ ⲡⲙⲟⲩ ⲛⲁϥ ⲛ̅‐ <text:line-break/><text:span text:style-name="T1"> </text:span><text:span text:style-name="T2">(90/24) </text:span> ⲉⲓⲱⲧ’· ⲁⲩⲱ ⲧⲙ̅ⲛ̅ⲧ̅’̅ⲁⲧⲥⲟⲟⲩⲛ <text:line-break/><text:span text:style-name="T1"> </text:span><text:span text:style-name="T2">(90/25) </text:span> ⲙ̅ⲙⲁⲁⲩ ⲛⲁϥ· ⲁⲩⲱ ⲛ̅ⲥⲩⲙ‐ <text:line-break/><text:span text:style-name="T1"> </text:span><text:span text:style-name="T2">(90/26) </text:span> ⲃⲟⲩⲗⲓⲁ ⲉⲑⲟⲟⲩ ⲁϥϫⲡⲟⲟⲩ <text:line-break/><text:span text:style-name="T1"> </text:span><text:span text:style-name="T2">(90/27) </text:span> ⲛⲁϥ ⲙ̅ϣⲃⲏⲣ ϩ̅ⲓ̅ ⲥⲟⲛ· ϫⲉⲕⲁⲁⲥ <text:line-break/><text:span text:style-name="T1"> </text:span><text:span text:style-name="T2">(90/28) </text:span> ⲛ̅ⲧⲟⲕ ⲡⲁⲑⲏⲧ’ ⲉⲕⲛⲁⲣⲓⲙⲉ ⲛⲁⲕ͂ <text:line-break/><text:span text:style-name="T1"> </text:span><text:span text:style-name="T2">(90/29) </text:span> ϫⲓⲛ ϯⲛⲟⲩ ϭⲉ ⲡⲁϣⲏⲣⲉ ⲛⲟ‐ <text:line-break/><text:span text:style-name="T1"> </text:span><text:span text:style-name="T2">(90/30) </text:span> ⲟⲩϩ̅ⲕ̅ ⲉϩⲟⲩⲛ ⲉⲧⲉⲕⲙ̅ⲛⲧ’̅ⲛⲟⲩ <text:line-break/><text:span text:style-name="T1"> </text:span><text:span text:style-name="T2">(90/31) </text:span> ⲧⲉ· ⲛⲓϣⲃⲏⲣ ⲉⲑⲟⲟⲩ ⲛ̅ⲣ̅ⲙ̅ⲛ̅‐ <text:line-break/><text:span text:style-name="T1"> </text:span><text:span text:style-name="T2">(90/32) </text:span> ⲕ[ⲣⲟ]ϥ ⲛⲟϫⲟⲩ ⲉⲃⲟⲗ ⲙ̅[ⲙⲟⲕ] <text:line-break/><text:span text:style-name="T1"> </text:span><text:span text:style-name="T2">(90/33) </text:span> [ϯ ⲙ̅ⲙ]ⲟⲕ ⲙ̅ⲡⲉⲭ̅ⲥ̅ [ⲁⲩ]ⲱ̣ [ϫⲓ ⲙ̅ⲙⲟϥ] <text:line-break/><text:span text:style-name="T1"> </text:span><text:span text:style-name="T2">(91/1) </text:span> ⲛ̅ⲥⲁϩ ⲉⲛⲁⲛⲟⲩϥ· ⲛⲟⲩϫⲉ ⲙ̅‐ <text:line-break/><text:span text:style-name="T1"> </text:span><text:span text:style-name="T2">(91/2) </text:span> ⲡⲙⲟⲩ ⲉⲃⲟⲗ ⲙ̅ⲙⲟⲕ ⲡⲉⲛⲧⲁϥ‐ <text:line-break/><text:span text:style-name="T1"> </text:span><text:span text:style-name="T2">(91/3) </text:span> ϣⲱⲡⲉ ⲛⲁⲕ ⲛ̅ⲉⲓⲱⲧ’· ⲛⲉⲣⲉ <text:line-break/><text:span text:style-name="T1"> </text:span><text:span text:style-name="T2">(91/4) </text:span> ⲡⲙⲟⲩ ⲅⲁⲣ ϣⲟⲟⲡ ⲁⲛ ⲟⲩⲧⲉ <text:line-break/><text:span text:style-name="T1"> </text:span><text:span text:style-name="T2">(91/5) </text:span> ⲛ̅ϥⲛⲁϣⲱⲡⲉ ⲁⲛ ϩ̅ⲛ̅ ⲑⲁⲏ· ⲁⲗⲗⲁ <text:line-break/><text:span text:style-name="T1"> </text:span><text:span text:style-name="T2">(91/6) </text:span> ⲉⲡⲓⲇⲏ ⲁⲕⲛⲟⲩϫⲉ ⲉⲃⲟⲗ ⲙ̅ⲙⲟⲕ <text:line-break/><text:span text:style-name="T1"> </text:span><text:span text:style-name="T2">(91/7) </text:span> ⲙ̅ⲡⲛⲟⲩⲧⲉ ⲡⲓⲱⲧ ⲟⲩⲁⲁⲃ· <text:line-break/><text:span text:style-name="T1"> </text:span><text:span text:style-name="T2">(91/8) </text:span> ⲡⲱⲛ̅ϩ̅ ⲛ̅ⲁⲗⲏⲑⲉⲓⲛⲟⲛ· ⲧⲡⲏ‐ <text:line-break/><text:span text:style-name="T1"> </text:span><text:span text:style-name="T2">(91/9) </text:span> ⲅⲏ ⲙ̅ⲡⲱⲛ̅ϩ̅· ⲉⲧⲃⲉ ⲡⲁⲓ̈ ⲁⲕⲣ̅‐ <text:line-break/><text:span text:style-name="T1"> </text:span><text:span text:style-name="T2">(91/10) </text:span> ⲕⲗⲏⲣⲟⲩ ⲉⲡⲙⲟⲩ ⲛ̅ⲉⲓⲱⲧ’ ⲛⲁⲕ <text:line-break/><text:span text:style-name="T1"> </text:span><text:span text:style-name="T2">(91/11) </text:span> ⲁⲩⲱ ⲧⲙ̅ⲛ̅ⲧ̅’̅ⲁⲧ’ⲥⲟⲟⲩⲛ ⲁⲕ‐ <text:line-break/><text:span text:style-name="T1"> </text:span><text:span text:style-name="T2">(91/12) </text:span> ϫⲡⲟⲥ ⲙ̅ⲙⲁⲁⲩ ⲛⲁⲕ· ⲁⲩⲣ̅ⲁⲡⲟⲥ <text:line-break/><text:span text:style-name="T1"> </text:span><text:span text:style-name="T2">(91/13) </text:span> ⲧⲉⲣⲓ ⲙ̅ⲙⲟⲕ ⲛ̅ⲧ̅ⲅⲛⲱⲥⲓⲥ ⲙ̅ⲙⲉ· <text:line-break/><text:span text:style-name="T1"> </text:span><text:span text:style-name="T2">(91/14) </text:span> ⲡⲁϣⲏⲣⲉ ⲛⲟⲟⲩϩ̅ⲕ̅ ⲇⲉ ⲉϩⲟⲩⲛ <text:line-break/><text:soft-page-break/><text:span text:style-name="T1"> </text:span><text:span text:style-name="T2">(91/15) </text:span> ⲉⲡⲉⲕⲉⲓⲱⲧ’ ⲛ̅ϣⲟⲣ̅ⲡ̅ ⲡⲛⲟⲩ‐ <text:line-break/><text:span text:style-name="T1"> </text:span><text:span text:style-name="T2">(91/16) </text:span> ⲧⲉ· ⲁⲩⲱ ⲧⲥⲟⲫⲓⲁ ⲧⲉⲕⲙⲁⲁⲩ <text:line-break/><text:span text:style-name="T1"> </text:span><text:span text:style-name="T2">(91/17) </text:span> ⲧⲁⲓ̈ ⲛ̅ⲧⲁⲕϣⲱⲡⲉ ⲉⲃⲟⲗ ⲛ̅ϩⲏⲧ̅ⲥ̅ <text:line-break/><text:span text:style-name="T1"> </text:span><text:span text:style-name="T2">(91/18) </text:span> ϫⲓⲛ ⲛ̅ϣⲟⲣ̅ⲡ̅ ⲉⲧⲣⲉⲕϯ ⲟⲩⲃⲉ <text:line-break/><text:span text:style-name="T1"> </text:span><text:span text:style-name="T2">(91/19) </text:span> ⲛⲉⲕϫⲁϫⲉ ⲧⲏⲣⲟⲩ ⲛ̅ⲇⲩⲛⲁⲙⲓⲥ <text:line-break/><text:span text:style-name="T1"> </text:span><text:span text:style-name="T2">(91/20) </text:span> ⲙ̅ⲡⲁⲛⲧⲓⲕⲓⲙⲉⲛⲟⲥ· ⲥⲱⲧ̅ⲙ̅ <text:line-break/><text:span text:style-name="T1"> </text:span><text:span text:style-name="T2">(91/21) </text:span> ⲡⲁϣⲏⲣⲉ ⲁⲧⲁⲥⲩⲙⲃⲟⲩⲗⲓⲁ· <text:line-break/><text:span text:style-name="T1"> </text:span><text:span text:style-name="T2">(91/22) </text:span> ⲙ̅ⲡ̅ⲣ̅ϣⲱⲡⲉ ⲛ̅ϫⲁⲥⲓϩⲏⲧ’ ⲟⲩ‐ <text:line-break/><text:span text:style-name="T1"> </text:span><text:span text:style-name="T2">(91/23) </text:span> ⲃⲉ ⲅⲛⲱⲙⲏ ⲛⲓⲙ ⲉⲛⲁⲛⲟⲩϥ· <text:line-break/><text:span text:style-name="T1"> </text:span><text:span text:style-name="T2">(91/24) </text:span> ⲁⲗⲗⲁ ϫⲓ ⲉⲣⲟⲕ ⲙ̅ⲡⲥⲁ ⲛ̅ⲧⲙ̅ⲛ̅ⲧ̅‐ <text:line-break/><text:span text:style-name="T1"> </text:span><text:span text:style-name="T2">(91/25) </text:span> ⲛⲟⲩⲧⲉ ⲙ̅ⲡⲗⲟⲅⲟⲥ· ⲁⲣⲉϩ ⲉⲛⲉⲛ‐ <text:line-break/><text:span text:style-name="T1"> </text:span><text:span text:style-name="T2">(91/26) </text:span> ⲧⲟⲗⲏ ⲉⲧⲟⲩⲁⲁⲃ ⲛ̅ⲓ̅ⲥ̅ ⲡⲉⲭ̅ⲥ̅· ⲁⲩ‐ <text:line-break/><text:span text:style-name="T1"> </text:span><text:span text:style-name="T2">(91/27) </text:span> ⲱ ⲕⲛⲁⲣ̅ ⲣ̅ⲣⲟ ⲉϫ̅ⲛ̅ ⲧⲟⲡⲟⲥ ⲛⲓⲙ <text:line-break/><text:span text:style-name="T1"> </text:span><text:span text:style-name="T2">(91/28) </text:span> ⲛ̅ⲧⲉ ⲡⲕⲁϩ· ⲁⲩⲱ ⲕⲛⲁϣⲱⲡⲉ <text:line-break/><text:span text:style-name="T1"> </text:span><text:span text:style-name="T2">(91/29) </text:span> ⲉⲕⲧⲁⲉⲓⲏⲟⲩ ⲛ̅ⲧ̅ⲛ̅ ⲛ̅ⲁⲅⲅⲉⲗⲟⲥ <text:line-break/><text:span text:style-name="T1"> </text:span><text:span text:style-name="T2">(91/30) </text:span> ⲙ̅ⲛ̅ ⲛ̅ⲁⲣⲭⲁⲅⲅⲉⲗⲟⲥ· ⲕⲛⲁϫⲡⲟ‐ <text:line-break/><text:span text:style-name="T1"> </text:span><text:span text:style-name="T2">(91/31) </text:span> ⲟⲩ ⲇⲉ ⲛⲁⲕ ⲛ̅ϣⲃⲏⲣ· ⲁⲩⲱ ⲛ̅‐ <text:line-break/><text:span text:style-name="T1"> </text:span><text:span text:style-name="T2">(91/32) </text:span> ϣⲃⲏⲣ ϩ̅ⲙ̅ϩⲁⲗ· ⲕⲛⲁϫⲡⲟ ⲇⲉ <text:line-break/><text:span text:style-name="T1"> </text:span><text:span text:style-name="T2">(91/33) </text:span> [ⲙ̅ⲙⲟⲟ]ⲩ ⲉⲛⲧⲟⲡⲟⲥ ϩ̅ⲛ̅ ⲧ̣[ⲡⲉ]· ⲁ‐ <text:line-break/><text:span text:style-name="T1"> </text:span><text:span text:style-name="T2">(91/34) </text:span> [ⲣⲓⲑⲁⲗ]ⲡⲉ[ⲓ ⲙ̅]ⲡⲑⲉⲓⲟⲛ ⲉ[ⲧ’ϣⲟ]‐ <text:line-break/><text:span text:style-name="T1"> </text:span><text:span text:style-name="T2">(92/1) </text:span> ⲟⲡ ⲛ̅ϩⲣⲁⲓ̈ ⲛ̅ϩⲏⲧ̅ⲕ̅ ⲙ̅ⲡⲣ̅ϯ ⲗⲩⲡⲏ <text:line-break/><text:span text:style-name="T1"> </text:span><text:span text:style-name="T2">(92/2) </text:span> ⲛⲁϥ ϩ̅ⲓ̅ ϩ̅ⲓ̅ⲥⲉ· ⲁⲗⲗⲁ ⲉⲕⲛⲁⲣ̅ⲑⲁⲗ <text:line-break/><text:span text:style-name="T1"> </text:span><text:span text:style-name="T2">(92/3) </text:span> ⲡⲉⲓ ⲙ̅ⲙⲟϥ ⲛ̅ⲅ̅ⲕⲱⲣϣ̅ ⲉⲣⲟϥ ⲉ‐ <text:line-break/><text:span text:style-name="T1"> </text:span><text:span text:style-name="T2">(92/4) </text:span> ⲧⲣⲉⲕϭⲱ ⲉⲕⲟⲩⲁⲁⲃ ⲛ̅ⲅ̅ϣⲱⲡⲉ <text:line-break/><text:span text:style-name="T1"> </text:span><text:span text:style-name="T2">(92/5) </text:span> ⲛ̅ⲉⲅⲕⲣⲁⲧⲏⲥ ϩ̅ⲛ̅ ⲧⲉⲕⲯⲩⲭⲏ <text:line-break/><text:span text:style-name="T1"> </text:span><text:span text:style-name="T2">(92/6) </text:span> ⲙ̅ⲛ̅ ⲡⲉⲕⲥⲱⲙⲁ· ⲁⲩⲱ ⲕⲛⲁϣⲱ‐ <text:line-break/><text:span text:style-name="T1"> </text:span><text:span text:style-name="T2">(92/7) </text:span> ⲡⲉ ⲛ̅ⲑⲣⲟⲛⲟⲥ ⲛ̅ⲧⲥⲟⲫⲓⲁ· ⲁⲩⲱ <text:line-break/><text:span text:style-name="T1"> </text:span><text:span text:style-name="T2">(92/8) </text:span> ⲛ̅ⲣ̅ⲙ̅ϩ̅ⲛ̅ⲏⲉⲓ ϩ̅ⲙ̅ ⲡⲛⲟⲩⲧⲉ· ϥⲛⲁ‐ <text:line-break/><text:span text:style-name="T1"> </text:span><text:span text:style-name="T2">(92/9) </text:span> ϯ ⲛⲁⲕ ⲛ̅ⲟⲩⲛⲟϭ ⲛ̅ⲟⲩⲟⲉⲓⲛ ⲉⲃⲟⲗ <text:line-break/><text:span text:style-name="T1"> </text:span><text:span text:style-name="T2">(92/10) </text:span> ϩ̅ⲓ̅ⲧⲟⲟⲧ̅ⲥ̅· ϩⲁⲧⲉϩⲏ ⲇⲉ ⲛ̅ϣⲁϫⲉ <text:line-break/><text:span text:style-name="T1"> </text:span><text:span text:style-name="T2">(92/11) </text:span> ⲛⲓⲙ ⲥⲟⲩⲱⲛ ⲡⲉⲕϫⲡⲟ· ⲥⲟⲩ‐ <text:line-break/><text:span text:style-name="T1"> </text:span><text:span text:style-name="T2">(92/12) </text:span> ⲱⲛ̅ⲅ̅ ϫⲉ ⲛ̅ⲧⲕ ⲟⲩⲉⲃⲟⲗ ϩ̅ⲛ̅ ⲁϣ ⲛ̅‐ <text:line-break/><text:span text:style-name="T1"> </text:span><text:span text:style-name="T2">(92/13) </text:span> ⲟⲩⲥⲓⲁ· ⲏ%0 ⲛ̅ⲧⲕ ⲟⲩⲉⲃⲟⲗ ϩ̅ⲛ̅ ⲁϣ ⲛ̅‐ <text:line-break/><text:span text:style-name="T1"> </text:span><text:span text:style-name="T2">(92/14) </text:span> ⲛ̅ⲅⲉⲛⲟⲥ· ⲏ%0 ⲉⲃⲟⲗ ϩ̅ⲛ̅ ⲁϣ ⲙ̅ⲫⲩⲗⲏ· <text:line-break/><text:span text:style-name="T1"> </text:span><text:span text:style-name="T2">(92/15) </text:span> ⲙ̅ⲙⲉ ⲙ̅ⲙⲟⲕ ϫⲉ ⲛ̅ⲧⲁⲕϣⲱⲡⲉ <text:line-break/><text:span text:style-name="T1"> </text:span><text:span text:style-name="T2">(92/16) </text:span> ⲉⲃⲟⲗ ϩⲛ̅ ϣⲟⲙⲉⲧ’ ⲛ̅ⲅⲉⲛⲟⲥ· ⲉ‐ <text:line-break/><text:span text:style-name="T1"> </text:span><text:span text:style-name="T2">(92/17) </text:span> ⲃⲟⲗ ϩ̅ⲙ̅ ⲡⲕⲁϩ· ⲁⲩⲱ ⲉⲃⲟⲗ ϩ̅ⲙ̅ ⲡⲉ <text:line-break/><text:span text:style-name="T1"> </text:span><text:span text:style-name="T2">(92/18) </text:span> ⲡⲗⲁⲥⲙⲁ· ⲁⲩⲱ ⲉⲃⲟⲗ ϩ̅ⲙ̅ ⲡⲧⲉⲛⲟ <text:line-break/><text:span text:style-name="T1"> </text:span><text:span text:style-name="T2">(92/19) </text:span> ⲛ̅ⲧⲁⲡⲥⲱⲙⲁ ϣⲱⲡⲉ ⲉⲃⲟⲗ ϩ̅ⲙ̅ <text:line-break/><text:span text:style-name="T1"> </text:span><text:span text:style-name="T2">(92/20) </text:span> ⲡⲕⲁϩ ϩ̅ⲛ̅ ⲟⲩⲟⲩⲥⲓⲁ ⲛ̅ⲕⲁϩ· ⲡⲉ‐ <text:line-break/><text:span text:style-name="T1"> </text:span><text:span text:style-name="T2">(92/21) </text:span> ⲡⲗⲁⲥⲙⲁ ⲇⲉ ⲁϥϣⲱⲡⲉ ⲉⲧⲃⲉ <text:line-break/><text:span text:style-name="T1"> </text:span><text:span text:style-name="T2">(92/22) </text:span> ⲧⲯⲩⲭⲏ ⲉⲃⲟⲗ ϩ̅ⲙ̅ ⲡⲙⲉⲉⲩⲉ ⲙ̅‐ <text:line-break/><text:span text:style-name="T1"> </text:span><text:span text:style-name="T2">(92/23) </text:span> ⲡⲑⲉⲓⲟⲛ· ⲡⲧⲉⲛⲟ ⲇⲉ ⲡⲉ ⲡⲛⲟⲩⲥ <text:line-break/><text:span text:style-name="T1"> </text:span><text:span text:style-name="T2">(92/24) </text:span> ⲡⲉⲛⲧⲁϥϣⲱⲡⲉ ⲕⲁⲧⲁ ⲑⲓⲕⲱⲛ <text:line-break/><text:span text:style-name="T1"> </text:span><text:span text:style-name="T2">(92/25) </text:span> ⲙ̅ⲡⲛⲟⲩⲧⲉ· ⲡⲛⲟⲩⲥ ⲙⲉⲛ ⲛ̅‐ <text:line-break/><text:span text:style-name="T1"> </text:span><text:span text:style-name="T2">(92/26) </text:span> ⲑⲉⲓⲟⲥ ⲟⲩⲛ̅ⲧⲁϥ ⲙ̅ⲙⲁⲩ ⲛ̅ⲟⲩ‐ <text:line-break/><text:span text:style-name="T1"> </text:span><text:span text:style-name="T2">(92/27) </text:span> ⲟⲩⲥⲓⲁ ⲉⲃⲟⲗ ϩ̅ⲙ̅ ⲡⲑⲉⲓⲟⲛ· ⲧⲯⲩ‐ <text:line-break/><text:soft-page-break/><text:span text:style-name="T1"> </text:span><text:span text:style-name="T2">(92/28) </text:span> ⲭⲏ ⲇⲉ ⲡⲉⲛⲧⲁϥⲣ̅ⲡⲗⲁⲥⲥⲉ ⲛ̅ⲛⲉⲩ‐ <text:line-break/><text:span text:style-name="T1"> </text:span><text:span text:style-name="T2">(92/29) </text:span> ϩⲏⲧ’ ⲟⲩⲁⲁⲩ· ⲉⲓ̈ⲙⲉⲉⲩⲉ ⲅⲁⲣ <text:line-break/><text:span text:style-name="T1"> </text:span><text:span text:style-name="T2">(92/30) </text:span> ϫⲉ ⲉⲥϣⲟⲟⲡ ⲛ̅ⲥϩ̅ⲓ̅ⲙⲉ ⲙ̅ⲡⲉⲛ‐ <text:line-break/><text:span text:style-name="T1"> </text:span><text:span text:style-name="T2">(92/31) </text:span> ⲧⲁϥϣⲱⲡⲉ ⲕⲁⲧⲁ ⲑⲓⲕⲱⲛ· ⲡⲥⲱ‐ <text:line-break/><text:span text:style-name="T1"> </text:span><text:span text:style-name="T2">(92/32) </text:span> ⲙⲁ ⲇⲉ ⲛ̅ⲧⲁϥϣⲱⲡⲉ ⲉⲃⲟⲗ ϩ̅ⲙ̅ <text:line-break/><text:span text:style-name="T1"> </text:span><text:span text:style-name="T2">(92/33) </text:span> ⲡⲕ̣ⲁ̣ϩ ⲧⲉϥⲟⲩⲥⲓⲁ ⲧⲉ ⲑⲩⲗ̣ⲏ· ⲉⲕ‐ <text:line-break/><text:span text:style-name="T1"> </text:span><text:span text:style-name="T2">(92/34) </text:span> [ϣⲁⲛ]ⲧⲟϩ̅ⲕ̅ ⲕⲛⲁϫⲡⲟ [ⲛⲁⲕ] ⲛ̣̅‐ <text:line-break/><text:span text:style-name="T1"> </text:span><text:span text:style-name="T2">(93/1) </text:span> ϣⲟⲙⲉⲧ’ ⲙ̅ⲙⲉⲣⲟⲥ· ϩ̅ⲙ̅ ⲡⲧⲣⲉⲕ‐ <text:line-break/><text:span text:style-name="T1"> </text:span><text:span text:style-name="T2">(93/2) </text:span> ϩⲉ ⲉⲃⲟⲗ ϩ̅ⲛ̅ ⲧⲁⲣⲉⲧⲏ ⲉⲡⲓⲧⲛ̅ ⲉⲩ‐ <text:line-break/><text:span text:style-name="T1"> </text:span><text:span text:style-name="T2">(93/3) </text:span> ϭⲱϫ̅ⲃ̅· ⲁⲣⲓⲡⲟⲗⲓⲧⲉⲩⲉ ⲕⲁⲧⲁ <text:line-break/><text:span text:style-name="T1"> </text:span><text:span text:style-name="T2">(93/4) </text:span> ⲡⲛⲟⲩⲥ· ⲙ̅ⲡ̅ⲣ̅ⲙⲉⲉⲩⲉ ⲉⲛⲁ <text:line-break/><text:span text:style-name="T1"> </text:span><text:span text:style-name="T2">(93/5) </text:span> ⲧⲥⲁⲣ̅ⲝ̅· ϫⲡⲟ ⲛⲁⲕ ⲛ̅ⲧⲙ̅ⲛⲧ’̅ϫⲱ <text:line-break/><text:span text:style-name="T1"> </text:span><text:span text:style-name="T2">(93/6) </text:span> ⲱⲣⲉ· ⲉⲃⲟⲗ ϫⲉ ⲟⲩϫⲱⲱⲣⲉ ⲡⲉ‐ <text:line-break/><text:span text:style-name="T1"> </text:span><text:span text:style-name="T2">(93/7) </text:span> ⲡⲛⲟⲩⲥ· ⲉⲕϣⲁⲛϩⲉ ⲉⲃⲟⲗ ϩ̅ⲛ̅ <text:line-break/><text:span text:style-name="T1"> </text:span><text:span text:style-name="T2">(93/8) </text:span> ⲧⲉⲓ̈ ⲕⲉⲟⲩ{ⲉ̅ⲓ} ⲁⲕϣⲱⲡⲉ ⲛ̅ϩⲟⲟⲩⲧ’ <text:line-break/><text:span text:style-name="T1"> </text:span><text:span text:style-name="T2">(93/9) </text:span> ⲥϩ̅ⲓ̅ⲙⲉ· ⲧⲟⲩⲥⲓⲁ ⲇⲉ ⲙ̅ⲡⲛⲟⲩⲥ <text:line-break/><text:span text:style-name="T1"> </text:span><text:span text:style-name="T2">(93/10) </text:span> ⲉⲧⲉ ⲧⲛⲟⲏⲥⲓⲥ ⲧⲉ· ⲉⲕϣⲁⲛ‐ <text:line-break/><text:span text:style-name="T1"> </text:span><text:span text:style-name="T2">(93/11) </text:span> ⲛⲟϫ̅ⲥ̅ ⲉⲃⲟⲗ ⲙ̅ⲙⲟⲕ· ⲁⲕϭⲱϫⲉ <text:line-break/><text:span text:style-name="T1"> </text:span><text:span text:style-name="T2">(93/12) </text:span> ⲙ̅ⲫⲟⲟⲩⲧ’· ⲁⲕⲕⲟⲧ̅ⲕ̅ ⲉⲧ’ⲥϩ̅ⲓ̅ <text:line-break/><text:span text:style-name="T1"> </text:span><text:span text:style-name="T2">(93/13) </text:span> ⲙⲉ ⲟⲩⲁⲁⲥ· ⲁⲕϣⲱⲡⲉ ⲙ̅ⲯⲩ‐ <text:line-break/><text:span text:style-name="T1"> </text:span><text:span text:style-name="T2">(93/14) </text:span> ⲭⲓⲕⲟⲥ ⲉⲁⲕϫⲓ ⲛ̅ⲧⲟⲩⲥⲓⲁ ⲙ̅ⲡⲉ‐ <text:line-break/><text:span text:style-name="T1"> </text:span><text:span text:style-name="T2">(93/15) </text:span> ⲡⲗⲁⲥⲙⲁ· ⲡⲕⲉⲕⲟⲩⲉⲓ ⲛ̅ⲧⲉ ⲡⲁⲓ̈ <text:line-break/><text:span text:style-name="T1"> </text:span><text:span text:style-name="T2">(93/16) </text:span> ⲉⲕϣⲁⲛⲛⲟϫ̅ϥ̅ ⲉⲃⲟⲗ̓ ϩⲱⲥⲧⲉ <text:line-break/><text:span text:style-name="T1"> </text:span><text:span text:style-name="T2">(93/17) </text:span> ⲛ̅ⲅ̅ⲧ̅ⲙ̅ⲥⲱⲧ’ ⲉϫⲡⲟ ⲛⲁⲕ ⲛ̅ⲟⲩ‐ <text:line-break/><text:span text:style-name="T1"> </text:span><text:span text:style-name="T2">(93/18) </text:span> ⲙⲉⲣⲟⲥ ⲛ̅ⲣⲱⲙⲉ· ⲁⲗⲗⲁ ⲁⲕϫⲓ ⲉ‐ <text:line-break/><text:span text:style-name="T1"> </text:span><text:span text:style-name="T2">(93/19) </text:span> ⲣⲟⲕ ⲙ̅ⲡⲙⲉⲉⲩⲉ ⲙ̅ⲡⲧ̅ⲃ̅ⲛⲏ ⲙ̅ⲛ̅ <text:line-break/><text:span text:style-name="T1"> </text:span><text:span text:style-name="T2">(93/20) </text:span> ⲡⲓⲛⲉ· ⲁⲕϣⲱⲡⲉ ⲛ̅ⲥⲁⲣⲕⲓⲕⲟⲥ <text:line-break/><text:span text:style-name="T1"> </text:span><text:span text:style-name="T2">(93/21) </text:span> ⲉⲁⲕϫⲓ ⲛ̅ⲟⲩⲫⲩⲥⲓⲥ ⲛ̅ⲧⲃ̅ⲛⲏ· <text:line-break/><text:span text:style-name="T1"> </text:span><text:span text:style-name="T2">(93/22) </text:span> ⲥⲙⲟⲕ̅ϩ̅ ⲅⲁⲣ ⲁϭⲓⲛⲉ ⲛ̅ⲟⲩⲯⲩⲭⲓ <text:line-break/><text:span text:style-name="T1"> </text:span><text:span text:style-name="T2">(93/23) </text:span> ⲕⲟⲥ· ⲡⲟⲥⲱ͂ ⲙⲁⲗⲗⲟⲛ ⲁϭⲓⲛⲉ <text:line-break/><text:span text:style-name="T1"> </text:span><text:span text:style-name="T2">(93/24) </text:span> ⲙ̅ⲡϫⲟⲉⲓⲥ· ⲉⲓ̈ϣⲁϫⲉ ⲇⲉ ϫⲉ <text:line-break/><text:span text:style-name="T1"> </text:span><text:span text:style-name="T2">(93/25) </text:span> ⲡⲛⲟⲩⲧⲉ ⲡⲉ ⲡⲉⲡ̅ⲛ̅ⲁ̅ⲧⲓⲕⲟⲥ· <text:line-break/><text:span text:style-name="T1"> </text:span><text:span text:style-name="T2">(93/26) </text:span> ⲡⲣⲱⲙⲉ ⲛ̅ⲧⲁϥϫⲓ ⲙⲟⲣⲫⲏ ⲉ‐ <text:line-break/><text:span text:style-name="T1"> </text:span><text:span text:style-name="T2">(93/27) </text:span> ⲃⲟⲗ ϩ̅ⲛ̅ ⲧⲟⲩⲥⲓⲁ ⲙ̅ⲡⲛⲟⲩⲧⲉ <text:line-break/><text:span text:style-name="T1"> </text:span><text:span text:style-name="T2">(93/28) </text:span> ⲧⲯⲩⲭⲏ ⲛ̅ⲑⲉⲓⲟⲛ ⲥⲣ̅ⲕⲟⲓⲛⲱ <text:line-break/><text:span text:style-name="T1"> </text:span><text:span text:style-name="T2">(93/29) </text:span> ⲛⲓ ⲉⲡⲁⲓ̈ ϩ̅ⲛ̅ ⲟⲩⲙⲉⲣⲟⲥ· ⲡⲁⲗⲓⲛ <text:line-break/><text:span text:style-name="T1"> </text:span><text:span text:style-name="T2">(93/30) </text:span> ⲧⲯⲩⲭⲏ ⲥ̅ⲣ̅ⲕⲟⲓⲛⲱⲛⲓ ⲉⲧⲥⲁⲣ̅ⲝ̅ ϩ̅ⲛ̅ <text:line-break/><text:span text:style-name="T1"> </text:span><text:span text:style-name="T2">(93/31) </text:span> ⲟⲩⲙⲉⲣⲟⲥ· ⲧⲯⲩⲭⲏ ⲙ̅ⲫⲁⲩ‐ <text:line-break/><text:span text:style-name="T1"> </text:span><text:span text:style-name="T2">(93/32) </text:span> ⲗⲟⲥ ϣⲁⲣⲉⲥⲣⲓⲕⲉ ⲛ̅ⲥⲁ ⲉⲥⲁ· <text:line-break/><text:span text:style-name="T1"> </text:span><text:span text:style-name="T2">(93/33) </text:span> [ϣⲁⲛ]ⲧ̅ⲥ̅ⲣ̅ⲇⲟϭⲓ ⲛ̅ⲧⲁⲗⲏⲑⲓⲁ <text:line-break/><text:span text:style-name="T1"> </text:span><text:span text:style-name="T2">(93/34) </text:span> [ⲛⲁⲛⲟ]ⲩⲥ ⲛⲁⲕ ⲱ͂ ⲡⲣⲱ[ⲙⲉ] <text:line-break/><text:span text:style-name="T1"> </text:span><text:span text:style-name="T2">(94/1) </text:span> ⲉⲧⲣⲉⲕⲣⲁⲕⲧ̅ⲕ̅ ⲉⲡⲣⲱⲙⲉ ⲛ̅‐ <text:line-break/><text:span text:style-name="T1"> </text:span><text:span text:style-name="T2">(94/2) </text:span> ϩⲟⲩⲟ ⲉⲣⲁⲧ̅ⲕ̅ ⲉⲧ’ⲫⲩⲥⲓⲥ ⲛ̅ⲧ̅ⲃ̅‐ <text:line-break/><text:span text:style-name="T1"> </text:span><text:span text:style-name="T2">(94/3) </text:span> ⲛⲏ· ⲉⲓ̈ϣⲁϫⲉ ⲉⲧⲥⲁⲣⲕⲓⲕⲏ· ⲡⲙⲁ <text:line-break/><text:span text:style-name="T1"> </text:span><text:span text:style-name="T2">(94/4) </text:span> ⲉⲧ̅ⲕ̅ⲛⲁⲣⲁⲕⲧ̅ⲕ̅ ⲉⲙⲁⲩ ⲕⲛⲁϫⲓ <text:line-break/><text:span text:style-name="T1"> </text:span><text:span text:style-name="T2">(94/5) </text:span> ⲡⲉϥⲉⲓⲛⲉ· ϯⲛⲁϫⲱ ⲛ̅ⲕⲉϣⲁ <text:line-break/><text:span text:style-name="T1"> </text:span><text:span text:style-name="T2">(94/6) </text:span> ϫⲉ ⲉⲣⲟⲕ· ⲡⲁⲗⲓⲛ ⲉⲧⲃⲉ ⲛⲓⲙ ⲉ‐ <text:line-break/><text:soft-page-break/><text:span text:style-name="T1"> </text:span><text:span text:style-name="T2">(94/7) </text:span> ⲕⲛⲁⲟⲩⲣⲟⲧ’ ⲛ̅ϩⲏⲧ’· ⲁⲣⲉⲟⲩⲱ‐ <text:line-break/><text:span text:style-name="T1"> </text:span><text:span text:style-name="T2">(94/8) </text:span> ϣⲉ ⲁⲣ̅ ⲧⲃ̅ⲛⲏ ⲛ̅ⲧⲁⲣⲉϣⲱⲡⲉ ϩ̅ⲛ̅ <text:line-break/><text:span text:style-name="T1"> </text:span><text:span text:style-name="T2">(94/9) </text:span> ⲧⲉⲓ̈ⲫⲩⲥⲓⲥ ⲛ̅ⲧⲉⲓ̈ⲙⲓⲛⲉ· ⲙⲁⲗ‐ <text:line-break/><text:span text:style-name="T1"> </text:span><text:span text:style-name="T2">(94/10) </text:span> ⲗⲟⲛ ⲇⲉ ⲁⲣ̅ⲕⲟⲓⲛⲱⲛⲓ ⲉⲩⲫⲩⲥⲓⲥ <text:line-break/><text:span text:style-name="T1"> </text:span><text:span text:style-name="T2">(94/11) </text:span> ⲙ̅ⲙⲉ ⲛ̅ⲧⲉ ⲡⲃⲓⲟⲥ· ⲧⲙ̅ⲛ̅ⲧ̅’̅ⲧ̅ⲃ̅‐ <text:line-break/><text:span text:style-name="T1"> </text:span><text:span text:style-name="T2">(94/12) </text:span> ⲛⲏ ⲙⲉⲛ ⲉⲥⲛⲁⲣ̅ ϩ̅ⲙ̅ⲙⲉ ⲙ̅ⲙⲟⲕ <text:line-break/><text:span text:style-name="T1"> </text:span><text:span text:style-name="T2">(94/13) </text:span> ⲉϩⲟⲩⲛ ⲉⲡⲅⲉⲛⲟⲥ ⲙ̅ⲡⲕⲁϩ· <text:line-break/><text:span text:style-name="T1"> </text:span><text:span text:style-name="T2">(94/14) </text:span> ⲧⲫⲩⲥⲓⲥ ⲇⲉ ⲛ̅ⲛⲟⲉⲣⲟⲛ ⲉⲥⲛⲁ <text:line-break/><text:span text:style-name="T1"> </text:span><text:span text:style-name="T2">(94/15) </text:span> ⲣ̅ ϩ̅ⲙ̅ⲙⲉ ⲙ̅ⲙⲟⲕ ϩⲍ̅ⲛ̅ ϩⲉⲛⲥⲙⲟⲧ <text:line-break/><text:span text:style-name="T1"> </text:span><text:span text:style-name="T2">(94/16) </text:span> ⲛ̅ⲛⲟⲉⲣⲟⲛ· ⲣⲁⲕⲧ̅ⲕ̅ ⲉϫ̅ⲛ̅ ⲧⲫⲩ‐ <text:line-break/><text:span text:style-name="T1"> </text:span><text:span text:style-name="T2">(94/17) </text:span> ⲥⲓⲥ ⲛ̅ⲛⲟⲉⲣⲟⲛ ⲛ̅ⲅ̅ⲛⲟⲩϫⲉ ⲉ‐ <text:line-break/><text:span text:style-name="T1"> </text:span><text:span text:style-name="T2">(94/18) </text:span> ⲃⲟⲗ ⲙ̅ⲙⲟⲕ ⲛ̅ⲧⲫⲩⲥⲓⲥ ⲛ̅ϫⲡⲟ <text:line-break/><text:span text:style-name="T1"> </text:span><text:span text:style-name="T2">(94/19) </text:span> ⲛ̅ⲕⲁϩ· ⲱ͂ ⲧⲯⲩⲭⲏ ⲧⲣⲉϥϩⲩⲡⲟ <text:line-break/><text:span text:style-name="T1"> </text:span><text:span text:style-name="T2">(94/20) </text:span> ⲙⲓⲛⲉ· ⲁⲣⲓⲛⲏⲫⲉ ⲛ̅ⲧⲉⲛⲁϩ ⲡⲉ <text:line-break/><text:span text:style-name="T1"> </text:span><text:span text:style-name="T2">(94/21) </text:span> ϯϩⲉ ⲉⲧⲉ ⲡⲁⲓ̈ ⲡⲉ ⲡϩⲱⲃ ⲛ̅ⲧⲙ̅ⲛ̅ⲧ̅’̅‐ <text:line-break/><text:span text:style-name="T1"> </text:span><text:span text:style-name="T2">(94/22) </text:span> ⲁⲧ’ⲥⲟⲟⲩⲛ· ⲉⲣⲉϣⲁⲛϩⲩⲡⲟ‐ <text:line-break/><text:span text:style-name="T1"> </text:span><text:span text:style-name="T2">(94/23) </text:span> ⲙⲓⲛⲉ ⲛ̅ⲧⲉⲡⲟⲗⲓⲧⲉⲩⲉ ϩ̅ⲙ̅ ⲡ‐ <text:line-break/><text:span text:style-name="T1"> </text:span><text:span text:style-name="T2">(94/24) </text:span> ⲥⲱⲙⲁ· ⲉⲣⲉⲟⲩⲏϩ ϩ̅ⲛ̅ ⲧⲙ̅ⲛⲧ̅ⲁ‐ <text:line-break/><text:span text:style-name="T1"> </text:span><text:span text:style-name="T2">(94/25) </text:span> ⲅⲣⲟⲓⲕⲟⲥ· ⲛ̅ⲧⲁⲣⲉⲉⲓ ⲉϩⲟⲩⲛ‐ <text:line-break/><text:span text:style-name="T1"> </text:span><text:span text:style-name="T2">(94/26) </text:span> ⲉⲩϫⲡⲟ ⲛ̅ⲥⲱⲙⲁⲧⲓⲕⲟⲛ ⲁⲩ‐ <text:line-break/><text:span text:style-name="T1"> </text:span><text:span text:style-name="T2">(94/27) </text:span> ϫⲡⲟⲟ͂· ⲁⲣⲉϣⲱⲡⲉ ⲙ̅ⲡϩⲟⲩⲛ <text:line-break/><text:span text:style-name="T1"> </text:span><text:span text:style-name="T2">(94/28) </text:span> ⲙ̅ⲡⲛⲩⲙⲫⲱⲛ ⲁⲣⲉⲣ̅ ⲟⲩⲟⲉⲓⲛ <text:line-break/><text:span text:style-name="T1"> </text:span><text:span text:style-name="T2">(94/29) </text:span> ϩ̅ⲙ̅ ⲡⲛⲟⲩⲥ· ⲡⲁϣⲏⲣⲉ ⲙ̅ⲡ̅ⲣ̅‐ <text:line-break/><text:span text:style-name="T1"> </text:span><text:span text:style-name="T2">(94/30) </text:span> ϣⲱⲡⲉ ⲉⲕⲛⲏⲏⲃⲉ ϩ̅ⲙ̅ ⲙⲟⲟⲩ‐ <text:line-break/><text:span text:style-name="T1"> </text:span><text:span text:style-name="T2">(94/31) </text:span> ⲛⲓⲙ· ⲁⲩⲱ ⲙ̅ⲡ̅ⲣ̅ⲧⲣⲉⲩϫⲁϩ‐ <text:line-break/><text:span text:style-name="T1"> </text:span><text:span text:style-name="T2">(94/32) </text:span> ⲙⲉϩ ϩ̅ⲛ̅ ϩⲉⲛⲅⲛⲱⲥⲓⲥ ⲛ̅ϣ̅ⲙ̅‐ <text:line-break/><text:span text:style-name="T1"> </text:span><text:span text:style-name="T2">(94/33) </text:span> ⲙⲟ [ⲏ] ⲙⲏ ⲕⲥⲟⲟⲩⲛ ⲁ[ⲛ ϫⲉ] <text:line-break/><text:span text:style-name="T1"> </text:span><text:span text:style-name="T2">(95/1) </text:span> ⲡⲁⲛⲧⲓⲕⲓⲙⲉⲛⲟⲥ ϩⲉⲛⲕⲟⲩ <text:line-break/><text:span text:style-name="T1"> </text:span><text:span text:style-name="T2">(95/2) </text:span> ⲉⲓ ⲁⲛ ⲛⲉ ⲛⲉϥⲉⲡⲓⲛⲟⲓⲁ· ⲁⲩⲱ <text:line-break/><text:span text:style-name="T1"> </text:span><text:span text:style-name="T2">(95/3) </text:span> ⲙ̅ⲙⲁⲅⲁⲛⲟⲛ ⲉⲧⲉ ⲟⲩⲛ̅ⲧⲁϥ <text:line-break/><text:span text:style-name="T1"> </text:span><text:span text:style-name="T2">(95/4) </text:span> ⲥⲉ ⲥⲉϣⲟⲃⲉ· ⲡⲛⲟⲏⲧⲟⲥ ⲛ̅‐ <text:line-break/><text:span text:style-name="T1"> </text:span><text:span text:style-name="T2">(95/5) </text:span> ⲣⲱⲙⲉ· ⲙⲁⲗⲓⲥⲧⲁ ⲁⲩⲣ̅ⲁⲡⲟⲥ‐ <text:line-break/><text:span text:style-name="T1"> </text:span><text:span text:style-name="T2">(95/6) </text:span> ⲧⲉⲣⲓ ⲙ̅ⲙⲟϥ ⲛ̅ⲧⲙ̅ⲛ̅ⲧⲣ̅ⲙ̅ⲛ̅ϩⲏⲧ’ <text:line-break/><text:span text:style-name="T1"> </text:span><text:span text:style-name="T2">(95/7) </text:span> ⲙⲫⲟϥ· ϣ̅ϣⲉ ⲅⲁⲣ ⲉⲣⲟⲕ ⲉ‐ <text:line-break/><text:span text:style-name="T1"> </text:span><text:span text:style-name="T2">(95/8) </text:span> ⲧⲣⲉⲕϣⲱⲡⲉ ⲉⲕⲧⲏⲧ’ ϩ̅ⲛ̅ ⲧⲙ̅ⲛ̅‐ <text:line-break/><text:span text:style-name="T1"> </text:span><text:span text:style-name="T2">(95/9) </text:span> ⲧⲣ̅ⲙ̅ⲛ̅ϩⲏⲧ’ ⲙ̅ⲡⲉⲥⲛⲁⲩ· ϩ̅ⲛ̅ ⲧⲙ̅ⲛ̅‐ <text:line-break/><text:span text:style-name="T1"> </text:span><text:span text:style-name="T2">(95/10) </text:span> ⲧⲣ̅ⲙ̅ⲛ̅ϩⲏⲧ’ ⲙ̅ⲫⲟϥ· ⲁⲩⲱ ϩ̅ⲛ̅ <text:line-break/><text:span text:style-name="T1"> </text:span><text:span text:style-name="T2">(95/11) </text:span> ⲧⲙ̅ⲛ̅ⲧ̅ⲃⲁⲗϩⲏⲧ’ ⲛ̅ⲧⲉ ϭⲣⲟⲟⲙⲡⲉ <text:line-break/><text:span text:style-name="T1"> </text:span><text:span text:style-name="T2">(95/12) </text:span> ⲙⲏⲡⲱⲥ ⲛϥ̅{ⲉ̅ⲓ} ⲉϩⲟⲩⲛ ϣⲁⲣⲟⲕ <text:line-break/><text:span text:style-name="T1"> </text:span><text:span text:style-name="T2">(95/13) </text:span> ⲙ̅ⲡ̅ⲥⲙⲟⲧ’ ⲙ̅ⲡⲉⲧ’ⲕⲱⲣ̅ϣ̅· <text:line-break/><text:span text:style-name="T1"> </text:span><text:span text:style-name="T2">(95/14) </text:span> ϩⲱⲥ ϣⲃⲏⲣ ⲙ̅ⲙⲉ ⲉϥϫⲱ ⲙ̅‐ <text:line-break/><text:span text:style-name="T1"> </text:span><text:span text:style-name="T2">(95/15) </text:span> ⲙⲟⲥ ϫⲉ ϯⲣ̅ⲥⲩⲙⲃⲟⲩⲗⲉⲩⲉ <text:line-break/><text:span text:style-name="T1"> </text:span><text:span text:style-name="T2">(95/16) </text:span> ⲛⲁⲕ ⲉⲛⲉⲧⲛⲁⲛⲟⲩⲟⲩ· ⲛ̅ⲧⲟⲕ <text:line-break/><text:span text:style-name="T1"> </text:span><text:span text:style-name="T2">(95/17) </text:span> ⲇⲉ ⲉⲙⲡⲉⲕⲉⲓⲙⲉ ⲉⲙⲙ̅ⲛ̅ⲧ̅’̅‐ <text:line-break/><text:span text:style-name="T1"> </text:span><text:span text:style-name="T2">(95/18) </text:span> ⲡⲁⲛⲟⲩⲣⲅⲟⲥ ⲙ̅ⲡⲁⲓ̈· ⲉϣϫⲉ <text:line-break/><text:span text:style-name="T1"> </text:span><text:span text:style-name="T2">(95/19) </text:span> ⲛ̅ⲧⲁⲕϫⲓⲧ̅ϥ̅ ⲛⲁⲕ ⲛ̅ϣⲃⲏⲣ ⲙ̅‐ <text:line-break/><text:span text:style-name="T1"> </text:span><text:span text:style-name="T2">(95/20) </text:span> ⲙⲉ· ⲙ̅ⲙⲉⲉⲩⲉ ⲅⲁⲣ ⲉⲑⲟⲟⲩ <text:line-break/><text:soft-page-break/><text:span text:style-name="T1"> </text:span><text:span text:style-name="T2">(95/21) </text:span> ϥⲛⲟⲩϫⲉ ⲙ̅ⲙⲟⲟⲩ ⲉⲡⲉⲕϩⲏⲧ’ <text:line-break/><text:span text:style-name="T1"> </text:span><text:span text:style-name="T2">(95/22) </text:span> ϩⲱⲥ ⲛⲉⲧⲛⲁⲛⲟⲩⲟⲩ· ⲁⲩⲱ <text:line-break/><text:span text:style-name="T1"> </text:span><text:span text:style-name="T2">(95/23) </text:span> ⲑⲩⲡⲟⲕⲣⲓⲥⲓⲥ ⲙ̅ⲡ̅ⲥⲙⲟⲧ’ ⲛ̅‐ <text:line-break/><text:span text:style-name="T1"> </text:span><text:span text:style-name="T2">(95/24) </text:span> ⲧⲣ̅ⲙ̅ⲧⲣ̅ⲙ̅ⲛ̅ϩⲏⲧ’ ⲉⲧⲟⲣ̅ϫ̅· ⲁⲩⲱ <text:line-break/><text:span text:style-name="T1"> </text:span><text:span text:style-name="T2">(95/25) </text:span> ⲧⲙ̅ⲛ̅ⲧ̅’̅ⲙⲁⲉⲓⲭⲣⲏⲙⲁ ⲙ̅ⲡⲥⲙⲟⲧ’ <text:line-break/><text:span text:style-name="T1"> </text:span><text:span text:style-name="T2">(95/26) </text:span> ⲛ̅ⲟⲩⲟⲓⲕⲟⲛⲟⲙⲓⲁ ⲉⲥⲛⲟⲩ <text:line-break/><text:span text:style-name="T1"> </text:span><text:span text:style-name="T2">(95/27) </text:span> ϩ̅ⲙ̅· ⲁⲩⲱ ⲧⲙ̅ⲛⲧ’̅ⲙⲁⲉⲓⲉⲟⲟⲩ <text:line-break/><text:span text:style-name="T1"> </text:span><text:span text:style-name="T2">(95/28) </text:span> ⲙ̅ⲡⲥⲙⲟⲧ’ ⲛ̅ⲛⲉⲧⲛⲉⲥⲱⲟⲩ· <text:line-break/><text:span text:style-name="T1"> </text:span><text:span text:style-name="T2">(95/29) </text:span> ⲁⲩⲱ ⲧⲙ̅ⲛ̅ⲧ̅’̅ⲁⲗⲁⲍⲱⲛ ⲙ̅ⲛ̅‐ <text:line-break/><text:span text:style-name="T1"> </text:span><text:span text:style-name="T2">(95/30) </text:span> ⲧⲙ̅ⲛ̅ⲧ̅’̅ϣⲟⲩϣⲟ ⲙ̅ⲡⲥⲙⲟⲧ’ <text:line-break/><text:span text:style-name="T1"> </text:span><text:span text:style-name="T2">(95/31) </text:span> ⲛ̅ⲟⲩⲛⲟϭ ⲛ̅ⲥⲧⲩⲫⲏ· ⲁⲩⲱ <text:line-break/><text:span text:style-name="T1"> </text:span><text:span text:style-name="T2">(95/32) </text:span> ⲧⲙ̅ⲛ̅ⲧ̅’̅ⲁⲧ’ⲛⲟⲩⲧⲉ ⲛ̅ⲑⲉ ⲛ̅‐ <text:line-break/><text:span text:style-name="T1"> </text:span><text:span text:style-name="T2">(95/33) </text:span> ⲟ̣[ⲩⲛⲟ]ϭ̣ ⲙ̅ⲙⲛ̅ⲧ̅’̅ⲛⲟⲩⲧⲉ· <text:line-break/><text:span text:style-name="T1"> </text:span><text:span text:style-name="T2">(96/1) </text:span> ⲡⲉⲧ’ϫⲱ ⲅⲁⲣ ⲙ̅ⲙⲟⲥ ϫⲉ ⲟⲩⲛ̅ <text:line-break/><text:span text:style-name="T1"> </text:span><text:span text:style-name="T2">(96/2) </text:span> ϯ ϩⲁϩ ⲛ̅ⲛⲟⲩⲧⲉ ⲉϥⲉ ⲛ̅ⲛⲁⲧⲛⲟⲩ <text:line-break/><text:span text:style-name="T1"> </text:span><text:span text:style-name="T2">(96/3) </text:span> ⲧⲉ· ⲁⲩⲱ ⲧⲅⲛⲱⲥⲓⲥ ⲉⲧⲟⲣ̅ϫ̅ <text:line-break/><text:span text:style-name="T1"> </text:span><text:span text:style-name="T2">(96/4) </text:span> ⲁⲛ ϥⲛⲟⲩϫⲉ ⲙ̅ⲙⲟⲥ ⲉⲡⲉⲕ‐ <text:line-break/><text:span text:style-name="T1"> </text:span><text:span text:style-name="T2">(96/5) </text:span> ϩⲏⲧ’ ⲙ̅ⲡⲥⲙⲟⲧ’ ⲛ̅ϩⲉⲛⲗⲟⲅⲟⲥ <text:line-break/><text:span text:style-name="T1"> </text:span><text:span text:style-name="T2">(96/6) </text:span> ⲙ̅ⲙⲩⲥⲧⲏⲣⲓⲟⲛ· ⲛⲓⲙ ⲡⲉⲧ’‐ <text:line-break/><text:span text:style-name="T1"> </text:span><text:span text:style-name="T2">(96/7) </text:span> ⲛⲁϣⲧⲁϩⲉ ⲛⲉϥⲙⲉⲉⲩⲉ ⲙ̅ⲛ̅ <text:line-break/><text:span text:style-name="T1"> </text:span><text:span text:style-name="T2">(96/8) </text:span> ⲛⲉϥⲕⲟⲧ̅ⲥ̅ ⲉⲧ’ϣⲟⲃⲉ· ⲉϥϣⲟ‐ <text:line-break/><text:span text:style-name="T1"> </text:span><text:span text:style-name="T2">(96/9) </text:span> ⲟⲡ ⲛ̅ⲛⲟϭ ⲛ̅ⲛⲟⲩⲥ ⲛ̅ⲛⲉⲧ’ⲟⲩ‐ <text:line-break/><text:span text:style-name="T1"> </text:span><text:span text:style-name="T2">(96/10) </text:span> ⲱϣ ⲉϫⲓⲧ̅ϥ̅ ⲛⲁⲩ ⲛ̅ⲣ̅ⲣⲟ· ⲡⲁ‐ <text:line-break/><text:span text:style-name="T1"> </text:span><text:span text:style-name="T2">(96/11) </text:span> ϣⲏⲣⲉ ⲁϣ ⲧⲉ ⲑⲉ ⲉⲧⲉⲕⲛⲁϣ‐ <text:line-break/><text:span text:style-name="T1"> </text:span><text:span text:style-name="T2">(96/12) </text:span> ⲧⲁϩⲉ ⲙ̅ⲙⲉⲉⲩⲉ ⲛ̅ⲡⲁⲓ̈· ⲏ ⲡⲉϥ‐ <text:line-break/><text:span text:style-name="T1"> </text:span><text:span text:style-name="T2">(96/13) </text:span> ϣⲟϫⲛⲉ ⲛ̅ⲣⲉϥϩⲧ̅ⲃ̅ ⲯⲩⲭⲏ· <text:line-break/><text:span text:style-name="T1"> </text:span><text:span text:style-name="T2">(96/14) </text:span> ⲛⲁϣⲉ ⲛⲉϥⲕⲟⲧⲥ̅ ⲅⲁⲣ ⲙ̅ⲛ̅ ⲛⲉ‐ <text:line-break/><text:span text:style-name="T1"> </text:span><text:span text:style-name="T2">(96/15) </text:span> ⲡⲓⲛⲟⲓⲁ ⲛ̅ⲧⲉϥⲡⲟⲛⲏⲣⲓⲁ· ⲁⲩⲱ <text:line-break/><text:span text:style-name="T1"> </text:span><text:span text:style-name="T2">(96/16) </text:span> ⲁⲣ̅ⲛⲟⲉⲓ ⲛ̅ⲛⲉϥⲡⲩⲗⲏ ϫⲉ ⲁϣ ⲧⲉ <text:line-break/><text:span text:style-name="T1"> </text:span><text:span text:style-name="T2">(96/17) </text:span> ⲑⲉ ⲉⲧ̅ϥ̅ⲛ̅ⲛⲏⲩ ⲉϩⲟⲩⲛ ⲉⲧⲉⲕ <text:line-break/><text:span text:style-name="T1"> </text:span><text:span text:style-name="T2">(96/18) </text:span> ⲯⲩⲭⲏ· ⲁⲩⲱ ϩ̅ⲓ̅ⲧ̅ⲛ̅ ⲁϣ ⲛ̅ϩ̅ⲃ̅ⲥⲱ <text:line-break/><text:span text:style-name="T1"> </text:span><text:span text:style-name="T2">(96/19) </text:span> ⲉϥⲛⲏⲩ ⲉϩⲟⲩⲛ ϣⲁⲣⲟⲕ· ϫⲓ ⲉ‐ <text:line-break/><text:span text:style-name="T1"> </text:span><text:span text:style-name="T2">(96/20) </text:span> ⲣⲟⲕ ⲙ̅ⲡⲉⲭ̅ⲥ̅ ⲡⲁⲓ̈ ⲉⲩⲛ̅ ϭⲟⲙ ⲙ̅‐ <text:line-break/><text:span text:style-name="T1"> </text:span><text:span text:style-name="T2">(96/21) </text:span> ⲙⲟϥ ⲉⲃⲟⲗ̅ⲕ̅ ⲉⲃⲟⲗ· ⲡⲉⲛⲧⲁϥ <text:line-break/><text:span text:style-name="T1"> </text:span><text:span text:style-name="T2">(96/22) </text:span> ϫⲓ ⲉⲣⲟϥ ⲛ̅ⲛ̅ⲕⲟⲧ̅ⲥ̅ ⲙ̅ⲡⲉⲧ̅ⲙ̅ <text:line-break/><text:span text:style-name="T1"> </text:span><text:span text:style-name="T2">(96/23) </text:span> ⲙⲁⲩ· ϫⲉⲕⲁⲁⲥ ϩ̅ⲓ̅ⲧ̅ⲛ̅ ⲛⲁⲓ̈ ⲉϥ <text:line-break/><text:span text:style-name="T1"> </text:span><text:span text:style-name="T2">(96/24) </text:span> ⲛⲁⲣ̅ⲕⲁⲧⲁⲗⲩⲉ ⲙ̅ⲙⲟϥ ϩ̅ⲛ̅ ⲟⲩ‐ <text:line-break/><text:span text:style-name="T1"> </text:span><text:span text:style-name="T2">(96/25) </text:span> ⲕⲣⲟϥ· ⲡⲁⲓ̈ ⲅⲁⲣ ⲡⲉ ⲡ̅ⲣ̅ⲣⲟ ⲉⲧⲉ <text:line-break/><text:span text:style-name="T1"> </text:span><text:span text:style-name="T2">(96/26) </text:span> ⲟⲩⲛ̅ⲧⲁⲕ̅ϥ̅ ⲉⲙⲁⲩϫⲣⲟ ⲉⲣⲟϥ <text:line-break/><text:span text:style-name="T1"> </text:span><text:span text:style-name="T2">(96/27) </text:span> ⲛ̅ⲗⲁⲁⲩ ⲛ̅ⲟⲩⲟⲉⲓϣ· ⲡⲁⲓ̈ ⲉⲙ̅ⲛ̅ <text:line-break/><text:span text:style-name="T1"> </text:span><text:span text:style-name="T2">(96/28) </text:span> ⲗⲁⲁⲩ ⲛⲁϣϯ ⲟⲩⲃⲏϥ· ⲟⲩ‐ <text:line-break/><text:span text:style-name="T1"> </text:span><text:span text:style-name="T2">(96/29) </text:span> ⲇⲉ ⲉϫⲉ ϣⲁϫⲉ ⲛⲁϥ· ⲡⲁⲓ̈ ⲡⲉ <text:line-break/><text:span text:style-name="T1"> </text:span><text:span text:style-name="T2">(96/30) </text:span> ⲡⲉⲕⲣ̅ⲣⲟ ⲁⲩⲱ ⲡⲉⲕⲉⲓⲱⲧ’ <text:line-break/><text:span text:style-name="T1"> </text:span><text:span text:style-name="T2">(96/31) </text:span> ⲙ̅ⲙ̅ⲛ̅ ⲡⲉⲧ’ⲧ̅ⲛ̅ⲧⲱⲛ ⲅⲁⲣ̣ ⲉⲣⲟ̣ϥ· <text:line-break/><text:span text:style-name="T1"> </text:span><text:span text:style-name="T2">(96/32) </text:span> ⲡⲥ[ⲁ]ϩ̣ ⲛ̅ⲑⲉⲓⲟⲥ ϥϩⲁⲧ[ⲏⲕ ⲛ̅ⲟ]ⲩ‐ <text:line-break/><text:span text:style-name="T1"> </text:span><text:span text:style-name="T2">(97/1) </text:span> ⲟⲉⲓϣ ⲛⲓⲙ ϥⲟ ⲛ̅ⲃⲟⲏⲑⲟⲥ· ϥⲧⲱ‐ <text:line-break/><text:span text:style-name="T1"> </text:span><text:span text:style-name="T2">(97/2) </text:span> ⲙⲛ̅ⲧ̅’̅ ⲇⲉ ⲉⲣⲟⲕ ⲉⲧⲃⲉ ⲧⲛⲟϥⲣⲉ <text:line-break/><text:soft-page-break/><text:span text:style-name="T1"> </text:span><text:span text:style-name="T2">(97/3) </text:span> ⲉⲧ̅ⲛ̅ϩⲏⲧ̅ⲕ̅· ⲙ̅ⲡ̅ⲣ̅ϯ ⲛ̅ⲟⲩϣⲁϫⲉ <text:line-break/><text:span text:style-name="T1"> </text:span><text:span text:style-name="T2">(97/4) </text:span> ⲙ̅ⲡⲟⲛⲏⲣⲓⲁ ϩ̅ⲛ̅ ⲧⲉⲕⲅⲛⲱⲙⲏ· <text:line-break/><text:span text:style-name="T1"> </text:span><text:span text:style-name="T2">(97/5) </text:span> ⲣⲱⲙⲉ ⲅⲁⲣ ⲛⲓⲙ ⲙ̅ⲡⲟⲛⲏⲣⲟⲥ <text:line-break/><text:span text:style-name="T1"> </text:span><text:span text:style-name="T2">(97/6) </text:span> ϥ̅ⲣ̅ⲃⲗⲁⲡⲧⲉⲓ ⲙ̅ⲡⲉϥϩⲏⲧ’· ⲟⲩ‐ <text:line-break/><text:span text:style-name="T1"> </text:span><text:span text:style-name="T2">(97/7) </text:span> ⲣⲱⲙⲉ ⲅⲁⲣ ⲛ̅ⲁⲑⲏⲧ’ ϣⲁϥⲃⲱⲕ <text:line-break/><text:span text:style-name="T1"> </text:span><text:span text:style-name="T2">(97/8) </text:span> ⲟⲩⲁⲁϥ ⲉϩⲟⲩⲛ ⲉⲡⲉϥϣⲟⲣϣ̅ⲣ̅ <text:line-break/><text:span text:style-name="T1"> </text:span><text:span text:style-name="T2">(97/9) </text:span> ⲟⲩⲣⲱⲙⲉ ⲇⲉ ⲛ̅ⲥⲟⲫⲟⲥ ϥⲥⲟ‐ <text:line-break/><text:span text:style-name="T1"> </text:span><text:span text:style-name="T2">(97/10) </text:span> ⲟⲩⲛ ⲛ̅ⲧⲉϥϩ̅ⲓ̅ⲏ· ⲟⲩⲣⲱⲙⲉ ⲇⲉ <text:line-break/><text:span text:style-name="T1"> </text:span><text:span text:style-name="T2">(97/11) </text:span> ⲛ̅ⲁⲑⲏⲧ’ ⲙⲁϥϩⲁⲣⲉϩ ⲉϣⲁϫⲉ ⲙ̅‐ <text:line-break/><text:span text:style-name="T1"> </text:span><text:span text:style-name="T2">(97/12) </text:span> ⲙⲩⲥⲧⲏⲣⲓⲟⲛ· ⲟⲩⲣⲱⲙⲉ ⲛ̅ⲥⲟ‐ <text:line-break/><text:span text:style-name="T1"> </text:span><text:span text:style-name="T2">(97/13) </text:span> ⲫⲟⲥ ⲙⲁϥⲛⲉϫ ϣⲁϫⲉ ⲛⲓⲙ ⲉⲃⲟⲗ <text:line-break/><text:span text:style-name="T1"> </text:span><text:span text:style-name="T2">(97/14) </text:span> ⲁⲗⲗⲁ ϥⲛⲁϣⲱⲡⲉ ⲛ̅ⲣⲉϥⲑⲉⲱ <text:line-break/><text:span text:style-name="T1"> </text:span><text:span text:style-name="T2">(97/15) </text:span> ⲣⲓ ⲛ̅ⲛⲉⲧ’ⲥⲱⲧ̅ⲙ̅· ⲙ̅ⲡ̅ⲣ̅ⲛⲉϫ <text:line-break/><text:span text:style-name="T1"> </text:span><text:span text:style-name="T2">(97/16) </text:span> ϣⲁϫⲉ ⲛⲓⲙ ⲉⲃⲟⲗ ⲉⲕϩⲏⲛ ⲉϩⲟ̅ⲩ̅ <text:line-break/><text:span text:style-name="T1"> </text:span><text:span text:style-name="T2">(97/17) </text:span> ⲉⲛⲉⲧ̅ⲕ̅ⲥⲟⲟⲩⲛ ⲙ̅ⲙⲟⲟⲩ ⲁⲛ· <text:line-break/><text:span text:style-name="T1"> </text:span><text:span text:style-name="T2">(97/18) </text:span> ⲕⲁ ⲟⲩⲙⲏⲏϣⲉ ⲛⲁⲕ ⲛ̅ϣⲃⲏⲣ <text:line-break/><text:span text:style-name="T1"> </text:span><text:span text:style-name="T2">(97/19) </text:span> ⲁⲗⲗⲁ ⲛ̅ⲣ̅ⲙ̅ⲛ̅ϣⲟϫⲛⲉ ⲁⲛ· ⲁⲣⲓ‐ <text:line-break/><text:span text:style-name="T1"> </text:span><text:span text:style-name="T2">(97/20) </text:span> ⲇⲟⲅⲓⲙⲁⲍⲉ ⲛ̅ϣⲟⲣ̅ⲡ̅ ⲙ̅ⲡⲉⲕ <text:line-break/><text:span text:style-name="T1"> </text:span><text:span text:style-name="T2">(97/21) </text:span> ⲣ̅ⲙ̅ⲛ̅ϣⲟϫⲛⲉ· ⲣⲱⲙⲉ ⲅⲁⲣ ⲛⲓⲙ <text:line-break/><text:span text:style-name="T1"> </text:span><text:span text:style-name="T2">(97/22) </text:span> ⲉϣⲁϥⲕⲱⲣ̅ϣ̅ ⲙ̅ⲡ̅ⲣ̅ⲧⲁⲉⲓⲟϥ· <text:line-break/><text:span text:style-name="T1"> </text:span><text:span text:style-name="T2">(97/23) </text:span> ⲡⲟⲩϣⲁϫⲉ ⲙⲉⲛ ϩⲟⲗⲉϭ ⲛ̅ⲑⲉ <text:line-break/><text:span text:style-name="T1"> </text:span><text:span text:style-name="T2">(97/24) </text:span> ⲙ̅ⲡⲉⲃⲓⲱ· ⲡⲉⲩϩⲏⲧ’ ⲇⲉ ⲙⲉϩ <text:line-break/><text:span text:style-name="T1"> </text:span><text:span text:style-name="T2">(97/25) </text:span> ⲛ̅ⲉⲗⲗⲉⲃⲟⲣⲟⲛ· ϩⲟⲧⲁⲛ ⲅⲁⲣ <text:line-break/><text:span text:style-name="T1"> </text:span><text:span text:style-name="T2">(97/26) </text:span> ⲉⲩϣⲁⲛⲙⲉⲉⲩⲉ ϫⲉ ⲁⲩϣⲱ‐ <text:line-break/><text:span text:style-name="T1"> </text:span><text:span text:style-name="T2">(97/27) </text:span> ⲡⲉ ⲛ̅ϣⲃⲏⲣ ⲉϥⲧⲁϫⲣⲟⲉⲓⲧ’· <text:line-break/><text:span text:style-name="T1"> </text:span><text:span text:style-name="T2">(97/28) </text:span> ⲧⲟⲧⲉ ϩ̅ⲛ̅ ⲟⲩⲕⲣⲟϥ ⲥⲉⲛⲁⲕⲟ <text:line-break/><text:span text:style-name="T1"> </text:span><text:span text:style-name="T2">(97/29) </text:span> ⲧⲟⲩ ⲉⲣⲟⲕ ⲛ̅ⲥⲉⲛⲟϫ̅ⲕ̅ ⲉⲡⲓⲧ̅ⲛ̅ <text:line-break/><text:span text:style-name="T1"> </text:span><text:span text:style-name="T2">(97/30) </text:span> ⲉⲡⲃⲟⲣⲃⲟⲣⲟⲥ· ⲙ̅ⲡⲣ̅ⲧⲁⲛ <text:line-break/><text:span text:style-name="T1"> </text:span><text:span text:style-name="T2">(97/31) </text:span> ϩⲟⲩⲧ̅ⲕ̅ ⲙ̅ⲙ̅ⲛ̅ ⲗⲁⲁⲩ ⲛ̅ϣⲃⲏⲣ <text:line-break/><text:span text:style-name="T1"> </text:span><text:span text:style-name="T2">(97/32) </text:span> ⲡⲉⲓ̈ⲕⲟⲥⲙⲟⲥ ⲅⲁⲣ ⲧⲏⲣ̅ϥ̅ ⲛ̅‐ <text:line-break/><text:span text:style-name="T1"> </text:span><text:span text:style-name="T2">(97/33) </text:span> ⲧⲁϥϣ̣ⲱⲡⲉ ϩ̅ⲛ̅ ⲟⲩⲕⲣⲟϥ· ⲁⲩ‐ <text:line-break/><text:span text:style-name="T1"> </text:span><text:span text:style-name="T2">(97/34) </text:span> [ⲱ ⲣⲱⲙ]ⲉ ⲛⲓⲙ ⲉϥϣⲧ̅ⲣ̣̅̅ⲧ̣ⲱ[ⲣ] <text:line-break/><text:span text:style-name="T1"> </text:span><text:span text:style-name="T2">(97/35) </text:span> [ϥⲟ ⲛ̅ⲧⲃ̅ⲛ]ⲏ ϩⲱⲃ ⲛⲓⲙ [ⲛ̅ⲧⲉ] <text:line-break/><text:span text:style-name="T1"> </text:span><text:span text:style-name="T2">(98/1) </text:span> ⲡⲕⲟⲥⲙⲟⲥ ϩⲉⲛϩⲏⲟⲩ ⲁⲛ ⲛⲉ· <text:line-break/><text:span text:style-name="T1"> </text:span><text:span text:style-name="T2">(98/2) </text:span> ⲁⲗⲗⲁ ⲉⲩϣⲱⲡⲉ ϩ̅ⲛ̅ ⲟⲩⲡⲉⲧ’ϣⲟⲩ‐ <text:line-break/><text:span text:style-name="T1"> </text:span><text:span text:style-name="T2">(98/3) </text:span> ⲉⲓⲧ’· ⲙ̅ⲛ̅ ⲗⲁⲁⲩ· ⲟⲩⲇⲉ ⲙ̅ⲛ̅ ⲥⲟⲛ· <text:line-break/><text:span text:style-name="T1"> </text:span><text:span text:style-name="T2">(98/4) </text:span> ⲉⲣⲉⲡⲟⲩⲁ ⲡⲟⲩⲁ ϣⲓⲛⲁ ⲛ̅ⲥⲁ‐ <text:line-break/><text:span text:style-name="T1"> </text:span><text:span text:style-name="T2">(98/5) </text:span> ⲧⲉϥⲛⲟϥⲣⲉ· ⲡⲁϣⲏⲣⲉ ⲙ̅ⲡ̅ⲣ̅‐ <text:line-break/><text:span text:style-name="T1"> </text:span><text:span text:style-name="T2">(98/6) </text:span> ⲕⲁ ⲣⲱⲙⲉ ⲛⲓⲙ ⲛⲁⲕ ϩⲱⲥ ϣⲃⲏⲣ <text:line-break/><text:span text:style-name="T1"> </text:span><text:span text:style-name="T2">(98/7) </text:span> ⲉⲕϣⲁⲛϫⲡⲟϥ ⲇⲉ ⲙ̅ⲡ̅ⲣ̅ⲧⲁⲁⲕ <text:line-break/><text:span text:style-name="T1"> </text:span><text:span text:style-name="T2">(98/8) </text:span> ⲛ̅ⲧⲟⲟⲧ̅ϥ̅· ⲧⲁⲁⲕ ⲛ̅ⲧⲟⲟⲧ̅ϥ̅ ⲙ̅‐ <text:line-break/><text:span text:style-name="T1"> </text:span><text:span text:style-name="T2">(98/9) </text:span> ⲡⲛⲟⲩⲧⲉ ⲟⲩⲁⲁϥ ϩⲱⲥ ⲉⲓⲱⲧ’ <text:line-break/><text:span text:style-name="T1"> </text:span><text:span text:style-name="T2">(98/10) </text:span> ⲁⲩⲱ ϩⲱⲥ ϣⲃⲏⲣ· ⲣⲱⲙⲉ ⲅⲁⲣ <text:line-break/><text:span text:style-name="T1"> </text:span><text:span text:style-name="T2">(98/11) </text:span> ⲛⲓⲙ ⲉⲩⲙⲟⲟϣⲉ ϩ̅ⲛ̅ ⲟⲩⲕⲣⲟϥ· <text:line-break/><text:span text:style-name="T1"> </text:span><text:span text:style-name="T2">(98/12) </text:span> ⲡⲕⲁϩ ⲧⲏⲣ̅ϥ̅ ⲉϥⲙⲉϩ ⲛ̅ϩ̅ⲓ̅ⲥⲉ ϩ̅ⲓ̅ <text:line-break/><text:span text:style-name="T1"> </text:span><text:span text:style-name="T2">(98/13) </text:span> ⲙ̅ⲕⲁϩ· ⲛⲁⲓ̈ ⲉⲙ̅ⲛ̅ϩⲏⲩ ⲛ̅ϩⲏⲧⲟⲩ· <text:line-break/><text:span text:style-name="T1"> </text:span><text:span text:style-name="T2">(98/14) </text:span> ⲉϣⲱⲡⲉ ⲉⲕⲟⲩⲱϣⲉ ⲉⲣ̅ ⲡⲉⲕ‐ <text:line-break/><text:soft-page-break/><text:span text:style-name="T1"> </text:span><text:span text:style-name="T2">(98/15) </text:span> ⲁϩⲉ ⲉⲕⲥϭⲣⲁϩ̅ⲧ̅’̅ ⲙ̅ⲡ̅ⲣ̅ⲙⲟⲟϣⲉ <text:line-break/><text:span text:style-name="T1"> </text:span><text:span text:style-name="T2">(98/16) </text:span> ⲙ̅ⲙ̅ⲛ̅ ⲗⲁⲁⲩ· ⲕⲁⲛ ⲉⲕϣⲁⲛⲙⲟ‐ <text:line-break/><text:span text:style-name="T1"> </text:span><text:span text:style-name="T2">(98/17) </text:span> ⲟϣⲉ ⲛ̅ⲙ̅ⲙⲁⲩ ϣⲱⲡⲉ ⲉϣϫⲉ <text:line-break/><text:span text:style-name="T1"> </text:span><text:span text:style-name="T2">(98/18) </text:span> ⲛ̅ⲅ̅ⲙⲟⲟϣⲉ ⲁⲛ· ϣⲱⲡⲉ ⲉⲕⲣ̅‐ <text:line-break/><text:span text:style-name="T1"> </text:span><text:span text:style-name="T2">(98/19) </text:span> ⲁⲛⲁϥ ⲙ̅ⲡⲛⲟⲩⲧⲉ ⲁⲩⲱ ⲛ̅ⲅ̅ⲛⲁ <text:line-break/><text:span text:style-name="T1"> </text:span><text:span text:style-name="T2">(98/20) </text:span> ⲣ̅ ⲭⲣⲉⲓⲁ ⲁⲛ ⲛ̅ⲗⲁⲁⲩ· ⲁⲣⲓⲡⲟⲗⲓ‐ <text:line-break/><text:span text:style-name="T1"> </text:span><text:span text:style-name="T2">(98/21) </text:span> ⲧⲉⲩⲉ ⲙ̅ⲛ̅ ⲡⲉⲭ̅ⲥ̅ ⲁⲩⲱ ϥⲛⲁⲛⲁϩ‐ <text:line-break/><text:span text:style-name="T1"> </text:span><text:span text:style-name="T2">(98/22) </text:span> ⲙⲉⲕ· ⲛ̅ⲧⲟϥ ⲅⲁⲣ ⲡⲉ ⲡⲟⲩⲟ‐ <text:line-break/><text:span text:style-name="T1"> </text:span><text:span text:style-name="T2">(98/23) </text:span> ⲉⲓⲛ ⲙ̅ⲙⲉ ⲁⲩⲱ ⲡⲣⲏ ⲙ̅ⲡⲱⲛ̅ϩ̅ <text:line-break/><text:span text:style-name="T1"> </text:span><text:span text:style-name="T2">(98/24) </text:span> ⲛⲑⲉ ⲅⲁⲣ ⲙ̅ⲡⲣⲏ ⲉⲧⲟⲩⲟⲛ̅ϩ̅ <text:line-break/><text:span text:style-name="T1"> </text:span><text:span text:style-name="T2">(98/25) </text:span> ⲉⲃⲟⲗ ⲉⲧⲣ̅ ⲟⲩⲟⲉⲓⲛ ⲉⲛⲃⲁⲗ <text:line-break/><text:span text:style-name="T1"> </text:span><text:span text:style-name="T2">(98/26) </text:span> ⲛ̅ⲧⲥⲁⲣ̅ⲝ̅· ⲧⲁⲓ̈ ⲧⲉ ⲑⲉ ⲙ̅ⲡⲉⲭ̅ⲥ̅· <text:line-break/><text:span text:style-name="T1"> </text:span><text:span text:style-name="T2">(98/27) </text:span> ϥ̅ⲣ̅ ⲟⲩⲟⲉⲓⲛ ⲉⲛⲟⲩⲥ ⲛⲓⲙ <text:line-break/><text:span text:style-name="T1"> </text:span><text:span text:style-name="T2">(98/28) </text:span> ⲁⲩⲱ ⲉⲫⲏⲧ’· ⲟⲩⲡⲟⲛⲏⲣⲟⲥ <text:line-break/><text:span text:style-name="T1"> </text:span><text:span text:style-name="T2">(98/29) </text:span> ⲅⲁⲣ ϩ̅ⲙ̅ ⲡⲥⲱⲙⲁ ⲟⲩⲙⲟⲩ ⲉϥ‐ <text:line-break/><text:span text:style-name="T1"> </text:span><text:span text:style-name="T2">(98/30) </text:span> ϩⲟⲟⲩ ⲡⲉ· ⲡⲟⲥⲱ ⲙⲁⲗⲗⲟⲛ <text:line-break/><text:span text:style-name="T1"> </text:span><text:span text:style-name="T2">(98/31) </text:span> ⲡⲉⲧⲉ ⲟⲩⲛ̅ⲧⲁϥ ⲙ̅ⲙⲁⲩ ⲙ̅‐ <text:line-break/><text:span text:style-name="T1"> </text:span><text:span text:style-name="T2">(98/32) </text:span> ⲡⲉϥⲛⲟⲩⲥ ⲉϥⲟ ⲃ̅ⲃⲗ̅ⲗⲉ· <text:line-break/><text:span text:style-name="T1"> </text:span><text:span text:style-name="T2">(98/33) </text:span> ⲃ̅ⲗ̅ⲗⲉ ⲅⲁⲣ ⲛⲓⲙ ϥⲙ[ⲟⲟϣⲉ] <text:line-break/><text:span text:style-name="T1"> </text:span><text:span text:style-name="T2">(98/34) </text:span> [ⲛ̅ⲑⲉ] ⲉⲛⲁⲩ ⲉⲣⲟϥ̣ [ⲉϥⲥⲱⲣⲙ̅ ⲛ̅]·‐ <text:line-break/><text:span text:style-name="T1"> </text:span><text:span text:style-name="T2">(99/1) </text:span> ⲑⲉ ⲙ̅ⲡⲉⲧⲉ ⲙ̅ⲙ̅ⲛ̅ⲧⲁϥ ⲙ̅ⲙⲁⲩ <text:line-break/><text:span text:style-name="T1"> </text:span><text:span text:style-name="T2">(99/2) </text:span> ⲙ̅ⲡⲉϥⲛⲟⲩⲥ ⲉϥⲟⲩⲟϫ· ⲙⲁϥ <text:line-break/><text:span text:style-name="T1"> </text:span><text:span text:style-name="T2">(99/3) </text:span> ϩⲏⲇⲁⲛⲉ ⲉϫⲡⲟ ⲛⲁϥ ⲙ̅ⲡⲟⲩⲟ‐ <text:line-break/><text:span text:style-name="T1"> </text:span><text:span text:style-name="T2">(99/4) </text:span> ⲉⲓⲛ ⲙ̅ⲡⲉⲭ̅ⲥ̅ ⲉⲧⲉ ⲡⲗⲟⲅⲟⲥ ⲡⲉ· <text:line-break/><text:span text:style-name="T1"> </text:span><text:span text:style-name="T2">(99/5) </text:span> ϩⲱⲃ ⲅⲁⲣ ⲛⲓⲙ ⲉⲧⲟⲩⲟⲛ̅ϩ̅ ⲉⲃⲟⲗ <text:line-break/><text:span text:style-name="T1"> </text:span><text:span text:style-name="T2">(99/6) </text:span> ⲉϥϣⲟⲟⲡ ⲛ̅ⲧⲩⲡⲟⲥ ⲙ̅ⲡⲉⲧ‐ <text:line-break/><text:span text:style-name="T1"> </text:span><text:span text:style-name="T2">(99/7) </text:span> ϩⲏⲡ· ⲛ̅ⲑⲉ ⲅⲁⲣ ⲛ̅ⲟⲩⲕⲱϩ̅ⲧ̅’̅ ⲉϥ‐ <text:line-break/><text:span text:style-name="T1"> </text:span><text:span text:style-name="T2">(99/8) </text:span> ϫⲉⲣⲟ ϩ̅ⲛ̅ ⲟⲩⲧⲟⲡⲟⲥ ⲉϥⲙⲏⲣ <text:line-break/><text:span text:style-name="T1"> </text:span><text:span text:style-name="T2">(99/9) </text:span> ⲁⲛ ⲉϩⲟⲩⲛ ⲉⲧⲟⲡⲟⲥ· ⲧⲁⲓ̈ ⲧⲉ <text:line-break/><text:span text:style-name="T1"> </text:span><text:span text:style-name="T2">(99/10) </text:span> ⲑⲉ ⲙ̅ⲡⲣⲏ ⲉⲧϩ̅ⲛ̅ ⲧⲡⲉ ⲛⲉϥⲁ‐ <text:line-break/><text:span text:style-name="T1"> </text:span><text:span text:style-name="T2">(99/11) </text:span> ⲕⲧⲓⲛ ⲧⲏⲣⲟⲩ ⲥⲉⲡⲏϩ ⲉⲛⲧⲟ‐ <text:line-break/><text:span text:style-name="T1"> </text:span><text:span text:style-name="T2">(99/12) </text:span> ⲡⲟⲥ ⲉⲧ’ϩ̅ⲓ̅ϫ̅ⲙ̅ ⲡⲕⲁϩ· ⲧⲁⲓ̈ ⲧⲉ ⲑⲉ <text:line-break/><text:span text:style-name="T1"> </text:span><text:span text:style-name="T2">(99/13) </text:span> ⲙ̅ⲡⲉⲭ̅ⲥ̅ ⲟⲩϩⲩⲡⲟⲥⲧⲁⲥⲓⲥ ⲛ̅‐ <text:line-break/><text:span text:style-name="T1"> </text:span><text:span text:style-name="T2">(99/14) </text:span> ⲟⲩⲱⲧ’ ⲧⲉⲧⲉ ⲟⲩⲛ̅ⲧⲁϥ̅ⲥ̅ ⲁⲩⲱ <text:line-break/><text:span text:style-name="T1"> </text:span><text:span text:style-name="T2">(99/15) </text:span> ϥ̅ⲣ̅ ⲟⲩⲟⲉⲓⲛ ⲉⲧⲟⲡⲟⲥ ⲛⲓⲙ· ⲧⲉⲓ̈ <text:line-break/><text:span text:style-name="T1"> </text:span><text:span text:style-name="T2">(99/16) </text:span> ϩⲉ ⲟⲛ ⲧⲉⲧ̅ϥ̅ϫⲱ ⲙ̅ⲙⲟⲥ ϩ̅ⲓ̅ ⲡⲉⲛ‐ <text:line-break/><text:span text:style-name="T1"> </text:span><text:span text:style-name="T2">(99/17) </text:span> ⲛⲟⲩⲥ· ⲙ̅ⲡⲥⲙⲟⲧ’ ⲛ̅ⲟⲩϩⲏⲃⲉⲥ <text:line-break/><text:span text:style-name="T1"> </text:span><text:span text:style-name="T2">(99/18) </text:span> ⲉϥϫⲉⲣⲟ ⲉϥⲣ̅ ⲟⲩⲟⲉⲓⲛ ⲉⲡⲧⲟ‐ <text:line-break/><text:span text:style-name="T1"> </text:span><text:span text:style-name="T2">(99/19) </text:span> ⲡⲟⲥ· ϩ̅ⲛ̅ ⲟⲩⲙⲉⲣⲟⲥ ⲛ̅ⲧⲉ ⲧⲯⲩ‐ <text:line-break/><text:span text:style-name="T1"> </text:span><text:span text:style-name="T2">(99/20) </text:span> ⲭⲏ ϥ̅ⲣ̅ ⲟⲩⲟⲉⲓⲛ ⲉⲛⲙⲉⲣⲟⲥ ⲧⲏ‐ <text:line-break/><text:span text:style-name="T1"> </text:span><text:span text:style-name="T2">(99/21) </text:span> ⲣⲟⲩ· ⲡⲁⲗⲓⲛ ϯⲛⲁϫⲉ ⲡⲉⲧ’‐ <text:line-break/><text:span text:style-name="T1"> </text:span><text:span text:style-name="T2">(99/22) </text:span> ϫⲟⲥⲉ ⲉⲡⲁⲓ̈· ⲡⲛⲟⲩⲥ ⲕⲁⲧⲁ <text:line-break/><text:span text:style-name="T1"> </text:span><text:span text:style-name="T2">(99/23) </text:span> ⲑⲩⲡⲟⲥⲧⲁⲥⲓⲥ ϥϩⲛ̅ ⲟⲩⲧⲟ‐ <text:line-break/><text:span text:style-name="T1"> </text:span><text:span text:style-name="T2">(99/24) </text:span> ⲡⲟⲥ ⲉⲧⲉ ⲡⲁⲓ̈ ⲡⲉ ϥϩ̅ⲙ̅ ⲡⲥⲱⲙⲁ· <text:line-break/><text:span text:style-name="T1"> </text:span><text:span text:style-name="T2">(99/25) </text:span> ⲕⲁⲧⲁ ⲧⲉⲡⲓⲛⲟⲓⲁ ⲇⲉ ⲡⲛⲟⲩⲥ <text:line-break/><text:span text:style-name="T1"> </text:span><text:span text:style-name="T2">(99/26) </text:span> ϩ̅ⲛ̅ ⲧⲟⲡⲟⲥ ⲁⲛ· ⲡⲱⲥ ⲅⲁⲣ ⲉϥ‐ <text:line-break/><text:span text:style-name="T1"> </text:span><text:span text:style-name="T2">(99/27) </text:span> ϣⲟⲟⲡ ϩ̅ⲛ̅ ⲧⲟⲡⲟⲥ· ϩⲟⲡⲟⲧⲉ <text:line-break/><text:soft-page-break/><text:span text:style-name="T1"> </text:span><text:span text:style-name="T2">(99/28) </text:span> ϥ̅ⲣ̅ⲑⲉⲱⲣⲓ ⲛ̅ⲧⲟⲡⲟⲥ ⲛⲓⲙ· <text:line-break/><text:span text:style-name="T1"> </text:span><text:span text:style-name="T2">(99/29) </text:span> ⲟⲩⲛ̅ ϭⲟⲙ ⲇⲉ ⲙ̅ⲙⲟⲛ ⲛ̅ⲧ̅ⲛ̅‐ <text:line-break/><text:span text:style-name="T1"> </text:span><text:span text:style-name="T2">(99/30) </text:span> ϫⲱ ⲙ̅ⲡⲉⲧ’ϫⲟⲥⲉ ⲉⲡⲁⲓ̈· ⲙ̅‐ <text:line-break/><text:span text:style-name="T1"> </text:span><text:span text:style-name="T2">(99/31) </text:span> ⲡ̅ⲣ̅ⲙⲉⲉⲩⲉ ⲅⲁⲣ ϩ̅ⲙ̅ ⲡⲉⲕϩⲏⲧ <text:line-break/><text:span text:style-name="T1"> </text:span><text:span text:style-name="T2">(99/32) </text:span> ϫⲉ ⲉⲣ̣ⲉⲡⲛⲟⲩⲧⲉ ϣⲟⲟⲡ <text:line-break/><text:span text:style-name="T1"> </text:span><text:span text:style-name="T2">(99/33) </text:span> [ϩ̅ⲛ̅ ⲟⲩⲧ]ⲟ̣ⲡⲟⲥ· ⲉϣϫ[ⲉ] ⲡ̣ϫ[ⲟ]‐ <text:line-break/><text:span text:style-name="T1"> </text:span><text:span text:style-name="T2">(99/34) </text:span> [ⲉⲓⲥ ⲙ̅ⲡⲧ]ⲏⲣ̅ϥ̅ ⲉⲕⲕⲱ ⲙ̣̅[ⲙⲟϥ] <text:line-break/><text:span text:style-name="T1"> </text:span><text:span text:style-name="T2">(100/1) </text:span> ϩ̅ⲛ̅ ⲟⲩⲧⲟⲡⲟⲥ· ϩ̅ⲓ̅ⲉ ϣ̅ϣⲉ ⲉⲧⲣⲉⲕ <text:line-break/><text:span text:style-name="T1"> </text:span><text:span text:style-name="T2">(100/2) </text:span> ϫⲟⲟⲥ ϫⲉ ⲡⲧⲟⲡⲟⲥ ϫⲟⲥⲉ ⲉⲡⲉⲧ‐ <text:line-break/><text:span text:style-name="T1"> </text:span><text:span text:style-name="T2">(100/3) </text:span> ⲟⲩϩⲏ ϩ̅ⲙ̅ ⲡⲧⲟⲡⲟⲥ· ⲡⲉⲧ’ϣⲱⲡ <text:line-break/><text:span text:style-name="T1"> </text:span><text:span text:style-name="T2">(100/4) </text:span> ⲅⲁⲣ ϥϫⲟⲥⲉ ⲉⲡⲉⲧⲟⲩϣⲱⲡ ⲙ̅‐ <text:line-break/><text:span text:style-name="T1"> </text:span><text:span text:style-name="T2">(100/5) </text:span> ⲙⲟϥ· ⲙ̅ⲛ̅ ⲧⲟⲡⲟⲥ ⲅⲁⲣ ⲉⲩⲙⲟⲩ‐ <text:line-break/><text:span text:style-name="T1"> </text:span><text:span text:style-name="T2">(100/6) </text:span> ⲧⲉ ⲉⲣⲟϥ ϫⲉ ⲁⲧⲥⲱⲙⲁ· ⲟⲩⲇⲓⲕⲁⲓ‐ <text:line-break/><text:span text:style-name="T1"> </text:span><text:span text:style-name="T2">(100/7) </text:span> ⲟⲛ ⲅⲁⲣ ⲁⲛ ⲡⲉ ⲉⲧⲣⲉⲛϫⲟⲟⲥ ϫⲉ <text:line-break/><text:span text:style-name="T1"> </text:span><text:span text:style-name="T2">(100/8) </text:span> ⲟⲩⲥⲱⲙⲁ ⲡⲉ ⲡⲛⲟⲩⲧⲉ ⲧⲁ‐ <text:line-break/><text:span text:style-name="T1"> </text:span><text:span text:style-name="T2">(100/9) </text:span> ⲕⲟⲗⲟⲩⲑⲓⲁ ⲅⲁⲣ ⲧⲉ ⲉⲧⲣⲉⲛϯ ⲛ̅‐ <text:line-break/><text:span text:style-name="T1"> </text:span><text:span text:style-name="T2">(100/10) </text:span> ⲟⲩⲁⲛⲁⲓ̈ ⲙ̅ⲛ̅ ⲟⲩϭⲱϫ̅ⲃ̅ ⲙ̅ⲡⲥⲱ‐ <text:line-break/><text:span text:style-name="T1"> </text:span><text:span text:style-name="T2">(100/11) </text:span> ⲙⲁ· ⲁⲩⲱ ⲡⲉⲧ’ϩⲟⲥⲉ ⲇⲉ ⲛ̅ⲛⲁⲓ̈ <text:line-break/><text:span text:style-name="T1"> </text:span><text:span text:style-name="T2">(100/12) </text:span> ϥⲛⲁⲙⲟⲩⲛ ⲉⲃⲟⲗ ⲁⲛ ⲉϥⲟ ⲛ̅ⲁⲧ‐ <text:line-break/><text:span text:style-name="T1"> </text:span><text:span text:style-name="T2">(100/13) </text:span> ⲧⲁⲕⲟ· ⲡⲣⲉϥⲥⲱⲛ̅ⲧ̅’̅ ⲙⲉⲛ ⲛ̅ⲥⲱ‐ <text:line-break/><text:span text:style-name="T1"> </text:span><text:span text:style-name="T2">(100/14) </text:span> ⲛ̅ⲧ̅’̅ ⲛⲓⲙ ϥⲙⲟⲕ̅ϩ̅ ⲙⲉⲛ ⲁⲛ ⲉⲥⲟⲩ‐ <text:line-break/><text:span text:style-name="T1"> </text:span><text:span text:style-name="T2">(100/15) </text:span> ⲱⲛ̅ϥ̅· ⲟⲩⲁⲧ’ϭⲟⲙ ⲇⲉ ⲡⲉ ⲉⲧⲁ <text:line-break/><text:span text:style-name="T1"> </text:span><text:span text:style-name="T2">(100/16) </text:span> ϩⲉ ⲡⲓⲛⲉ ⲙ̅ⲡⲁⲓ̈· ⲛ̅ⲣⲱⲙⲉ ⲅⲁⲣ <text:line-break/><text:span text:style-name="T1"> </text:span><text:span text:style-name="T2">(100/17) </text:span> ⲟⲩⲁⲁⲩ ⲁⲛ ⲛⲉⲧ̅ⲥ̅ⲙⲟⲕ̅ϩ̅ ⲛⲁⲩ ⲉ‐ <text:line-break/><text:span text:style-name="T1"> </text:span><text:span text:style-name="T2">(100/18) </text:span> ⲧⲁϩⲉ ⲡⲛⲟⲩⲧⲉ· ⲁⲗⲗⲁ ⲥⲙⲟⲕ̅ϩ̅ <text:line-break/><text:span text:style-name="T1"> </text:span><text:span text:style-name="T2">(100/19) </text:span> ⲙ̅ⲫⲩⲥⲓⲥ ⲛⲓⲙ ⲛ̅ⲑⲉⲓⲟⲥ ⲛ̅ⲁⲅ‐ <text:line-break/><text:span text:style-name="T1"> </text:span><text:span text:style-name="T2">(100/20) </text:span> ⲅⲉⲗⲟⲥ ⲁⲩⲱ ⲛ̅ⲁⲣⲭⲁⲅⲅⲉⲗⲟⲥ· <text:line-break/><text:span text:style-name="T1"> </text:span><text:span text:style-name="T2">(100/21) </text:span> ⲟⲩⲁⲛⲁⲅⲕⲁⲓⲟⲛ ⲡⲉ ⲉⲥⲟⲩⲱⲛ <text:line-break/><text:span text:style-name="T1"> </text:span><text:span text:style-name="T2">(100/22) </text:span> ⲡⲛⲟⲩⲧⲉ ⲛ̅ⲑⲉ ⲉⲧ̅ϥ̅ϣⲟⲟⲡ <text:line-break/><text:span text:style-name="T1"> </text:span><text:span text:style-name="T2">(100/23) </text:span> ⲙ̅ⲙⲟⲥ· ⲙ̅ⲙ̅ⲛ̅ ϭⲟⲙ ⲙ̅ⲙⲟⲕ <text:line-break/><text:span text:style-name="T1"> </text:span><text:span text:style-name="T2">(100/24) </text:span> ⲉⲥⲟⲩⲱⲛ ⲡⲛⲟⲩⲧⲉ ϩ̅ⲓ̅ⲧ̅ⲛ̅ <text:line-break/><text:span text:style-name="T1"> </text:span><text:span text:style-name="T2">(100/25) </text:span> ⲗⲁⲁⲩ ⲉⲓⲙⲏⲧⲓ ϩ̅ⲓ̅ⲧ̅ⲙ̅ ⲡⲉⲭ̅ⲥ̅ <text:line-break/><text:span text:style-name="T1"> </text:span><text:span text:style-name="T2">(100/26) </text:span> ⲡⲁⲓ̈ ⲉⲧⲉ ⲟⲩⲛ̅ⲧⲁϥ ⲙ̅ⲙⲁⲩ ⲛ̅‐ <text:line-break/><text:span text:style-name="T1"> </text:span><text:span text:style-name="T2">(100/27) </text:span> ⲑⲓⲕⲱⲛ ⲙ̅ⲡⲓⲱⲧ’· ⲧⲉⲓ̈ϩ̅ⲓ̅ⲕⲱⲛ <text:line-break/><text:span text:style-name="T1"> </text:span><text:span text:style-name="T2">(100/28) </text:span> ⲅⲁⲣ ⲥⲟⲩⲱⲛ̅ϩ̅ ⲉⲃⲟⲗ ⲙ̅ⲡⲓⲛⲉ <text:line-break/><text:span text:style-name="T1"> </text:span><text:span text:style-name="T2">(100/29) </text:span> ⲙ̅ⲙⲉ· ⲕⲁⲧⲁ ⲡⲉⲧⲟⲩⲟⲛ̅ϩ̅ ⲉ‐ <text:line-break/><text:span text:style-name="T1"> </text:span><text:span text:style-name="T2">(100/30) </text:span> ⲃⲟⲗ ⲙⲁⲩⲥⲟⲩⲱⲛ ⲣ̅ⲣⲟ ⲭⲱ‐ <text:line-break/><text:span text:style-name="T1"> </text:span><text:span text:style-name="T2">(100/31) </text:span> ⲣⲓⲥ ϩ̅ⲓ̅ⲕⲱⲛ· ⲁⲣⲓⲛⲟⲉⲓ ⲛⲁⲓ̈ ⲙ̅‐ <text:line-break/><text:span text:style-name="T1"> </text:span><text:span text:style-name="T2">(100/32) </text:span> ⲡⲛⲟⲩⲧⲉ ϫⲉ ϥϣⲟⲟⲡ ϩ̅ⲛ̅ ⲧⲟ‐ <text:line-break/><text:span text:style-name="T1"> </text:span><text:span text:style-name="T2">(100/33) </text:span> ⲡⲟⲥ̣ ⲛⲓⲙ ⲡⲁⲗⲓⲛ ϥϩ̣̅̅ⲛ̣̅̅ [ⲗⲁⲁⲩ] <text:line-break/><text:span text:style-name="T1"> </text:span><text:span text:style-name="T2">(100/34) </text:span> [ⲁⲛ ⲛ̅]ⲧⲟⲡⲟⲥ· ⲕ[ⲁⲧⲁ ⲣⲱⲙⲉ] <text:line-break/><text:span text:style-name="T1"> </text:span><text:span text:style-name="T2">(101/1) </text:span> ⲙⲉⲛ ϥϩ̅ⲛ̅ ⲧⲟⲡⲟⲥ ⲛⲓⲙ· ⲕⲁ‐ <text:line-break/><text:span text:style-name="T1"> </text:span><text:span text:style-name="T2">(101/2) </text:span> ⲧⲁ ⲧⲙ̅ⲛ̅ⲧ̅’̅ⲛⲟⲩⲧⲉ ⲇⲉ ϥϩ̅ⲛ̅ ⲗⲁⲁⲩ <text:line-break/><text:span text:style-name="T1"> </text:span><text:span text:style-name="T2">(101/3) </text:span> ⲁⲛ ⲛ̅ⲧⲟⲡⲟⲥ· ⲧⲉⲓ̈ϩⲉ ⲅⲁⲣ ⲟⲩⲛ̅ <text:line-break/><text:span text:style-name="T1"> </text:span><text:span text:style-name="T2">(101/4) </text:span> ϭⲟⲙ ⲉⲥⲟⲩⲱⲛ ⲡⲛⲟⲩⲧⲉ ⲛ̅‐ <text:line-break/><text:span text:style-name="T1"> </text:span><text:span text:style-name="T2">(101/5) </text:span> ⲟⲩⲕⲟⲩⲉⲓ· ⲕⲁⲧⲁ ⲧⲉϥϭⲟⲙ <text:line-break/><text:span text:style-name="T1"> </text:span><text:span text:style-name="T2">(101/6) </text:span> ⲙⲉⲛ ϥⲙⲟⲩϩ ⲙ̅ⲙⲁ ⲛⲓⲙ· ϩ̅ⲙ̅ <text:line-break/><text:soft-page-break/><text:span text:style-name="T1"> </text:span><text:span text:style-name="T2">(101/7) </text:span> ⲡϫⲓⲥⲉ ⲇⲉ ⲛ̅ⲧⲉϥⲙ̅ⲛ̅ⲧ̅’̅ⲛⲟⲩ‐ <text:line-break/><text:span text:style-name="T1"> </text:span><text:span text:style-name="T2">(101/8) </text:span> ⲧⲉ ⲙ̅ⲙ̅ⲛ̅ ⲗⲁⲁⲩ ϣⲱⲡ ⲙ̅ⲙⲟϥ· <text:line-break/><text:span text:style-name="T1"> </text:span><text:span text:style-name="T2">(101/9) </text:span> ⲟⲩⲟⲛ ⲛⲓⲙ ϣⲟⲟⲡ ϩ̅ⲙ̅ ⲡⲛⲟⲩ‐ <text:line-break/><text:span text:style-name="T1"> </text:span><text:span text:style-name="T2">(101/10) </text:span> ⲧⲉ· ⲡⲛⲟⲩⲧⲉ ⲇⲉ ϩ̅ⲛ̅ ⲗⲁⲁⲩ ⲁⲛ· <text:line-break/><text:span text:style-name="T1"> </text:span><text:span text:style-name="T2">(101/11) </text:span> ⲟⲩⲟⲩ ⲇⲉ ⲡⲉ ⲉⲥⲟⲩⲱⲛ ⲡⲛⲟⲩ‐ <text:line-break/><text:span text:style-name="T1"> </text:span><text:span text:style-name="T2">(101/12) </text:span> ⲧⲉ· ⲡⲧⲏⲣ̅ϥ̅ ⲇⲉ ⲉⲧ’ϩ̅ⲛ̅ ⲧⲙⲉ <text:line-break/><text:span text:style-name="T1"> </text:span><text:span text:style-name="T2">(101/13) </text:span> ⲡⲉ ⲡⲛⲟⲩⲧⲉ· ⲟⲩⲁⲧ’ϭⲟⲙ ⲇⲉ <text:line-break/><text:span text:style-name="T1"> </text:span><text:span text:style-name="T2">(101/14) </text:span> ⲡⲉ ⲁⲣ̅ⲑⲉⲱⲣⲓ ⲙ̅ⲡⲉⲭ̅ⲥ̅ ⲛ̅ⲑⲉ <text:line-break/><text:span text:style-name="T1"> </text:span><text:span text:style-name="T2">(101/15) </text:span> ⲙ̅ⲡⲣⲏ· ⲡⲛⲟⲩⲧⲉ ⲛⲁⲩ ⲉⲟⲩ‐ <text:line-break/><text:span text:style-name="T1"> </text:span><text:span text:style-name="T2">(101/16) </text:span> ⲟⲛ ⲛⲓⲙ ⲙ̅ⲙ̅ⲛ̅ ⲗⲁⲁⲩ ⲣ̅ⲑⲉⲱⲣⲓ <text:line-break/><text:span text:style-name="T1"> </text:span><text:span text:style-name="T2">(101/17) </text:span> ⲙ̅ⲙⲟϥ· ⲡⲉⲭ̅ⲥ̅ ⲇⲉ ⲛ̅ⲟⲩⲱϣ <text:line-break/><text:span text:style-name="T1"> </text:span><text:span text:style-name="T2">(101/18) </text:span> ⲛ̅ⲣ̅ⲫⲑⲟⲛⲓ ϣⲁϥϫⲓ ⲛ̅ϥ̅ϯ· ⲛ̅ⲧⲟϥ <text:line-break/><text:span text:style-name="T1"> </text:span><text:span text:style-name="T2">(101/19) </text:span> ⲇⲉ ⲡⲉ ⲡⲟⲩⲟⲉⲓⲛ ⲙ̅ⲡⲓⲱⲧ’ ⲉϥⲣ̅‐ <text:line-break/><text:span text:style-name="T1"> </text:span><text:span text:style-name="T2">(101/20) </text:span> ⲟⲩⲟⲉⲓⲛ ⲛ̅ⲟⲩⲱϣ ⲛ̅ⲣ̅ⲫⲑⲟⲛⲓ· <text:line-break/><text:span text:style-name="T1"> </text:span><text:span text:style-name="T2">(101/21) </text:span> ⲧⲁⲓ̈ ⲧⲉ ⲑⲉ ⲉϥⲣ̅ ⲟⲩⲟⲉⲓⲛ ⲉⲧⲟ‐ <text:line-break/><text:span text:style-name="T1"> </text:span><text:span text:style-name="T2">(101/22) </text:span> ⲡⲟⲥ ⲛⲓⲙ· ⲡⲉⲭ̅ⲥ̅ ⲇⲉ ⲡⲉ ⲡⲧⲏⲣ̅ϥ̅ <text:line-break/><text:span text:style-name="T1"> </text:span><text:span text:style-name="T2">(101/23) </text:span> ⲡⲉⲛⲧⲁϥⲣ̅ⲕⲗⲏⲣⲟⲩ ⲉⲡⲧⲏⲣ̅ϥ̅ ⲉ‐ <text:line-break/><text:span text:style-name="T1"> </text:span><text:span text:style-name="T2">(101/24) </text:span> ⲃⲟⲗ ϩ̅ⲙ̅ ⲡⲉⲧ’ϣⲟⲟⲡ· ⲡⲧⲏⲣ̅ϥ̅ <text:line-break/><text:span text:style-name="T1"> </text:span><text:span text:style-name="T2">(101/25) </text:span> ⲅⲁⲣ ⲡⲉ ⲡⲉⲭ̅ⲥ̅· ⲭⲱⲣⲓⲥ ⲧⲙ̅ⲛⲧ’̅‐ <text:line-break/><text:span text:style-name="T1"> </text:span><text:span text:style-name="T2">(101/26) </text:span> ⲁⲧ’ⲧⲁⲕⲟ· ⲉⲕϣⲁⲛⲣ̅ⲛⲟⲉⲓ̈ ⲅⲁⲣ <text:line-break/><text:span text:style-name="T1"> </text:span><text:span text:style-name="T2">(101/27) </text:span> ⲙ̅ⲡⲛⲟⲃⲉ ⲟⲩⲟⲩⲥⲓⲁ ⲁⲛ ⲡⲉ· <text:line-break/><text:span text:style-name="T1"> </text:span><text:span text:style-name="T2">(101/28) </text:span> ⲧⲛⲟⲏⲥⲓⲥ ⲅⲁⲣ ⲛ̅ⲧⲙ̅ⲛ̅ⲧ̅’̅ⲁⲧ’ⲧⲁ‐ <text:line-break/><text:span text:style-name="T1"> </text:span><text:span text:style-name="T2">(101/29) </text:span> ⲕⲟ ⲡⲉ ⲡⲉⲭ̅ⲥ̅· ⲁⲩⲱ ⲡⲟⲩⲟⲉⲓⲛ <text:line-break/><text:span text:style-name="T1"> </text:span><text:span text:style-name="T2">(101/30) </text:span> ⲡⲉ ⲉϥⲡ̅ⲣ̅ⲣⲓⲱⲟⲩ ⲉϥϫⲁϩ̅ⲙ̅ ⲁⲛ· <text:line-break/><text:span text:style-name="T1"> </text:span><text:span text:style-name="T2">(101/31) </text:span> ⲡⲣⲏ ⲅⲁⲣ ϩ̅ⲛ̅ ⲧⲟⲡⲟⲥ ⲛⲓⲙ ⲛ̅ⲁⲕⲁ‐ <text:line-break/><text:span text:style-name="T1"> </text:span><text:span text:style-name="T2">(101/32) </text:span> ⲑⲁⲣⲧⲟⲛ ⲁⲩⲱ ⲛ̅ϥ̅ϫⲱϩ̅ⲙ̅ ⲁⲛ· <text:line-break/><text:span text:style-name="T1"> </text:span><text:span text:style-name="T2">(101/33) </text:span> ⲧⲁⲓ̈ ⲧⲉ ⲑⲉ ⲙ̅ⲡⲉⲭ̅ⲥ̅ ⲉϣϫⲉ‐ <text:line-break/><text:span text:style-name="T1"> </text:span><text:span text:style-name="T2">(101/34) </text:span> ϥ̣ϩ̣ⲙ̣̅ ⲡ̣ϣⲧⲁ· ⲁⲗⲗⲁ ⲟⲩⲁ[ⲧ]ϣⲧ̣ⲁ̣‐ <text:line-break/><text:span text:style-name="T1"> </text:span><text:span text:style-name="T2">(101/35) </text:span> [ⲡ]ⲉ̣· ⲁ̣ⲩ̣ⲱ̣ ⲉϣϫⲉ ⲛ̅ⲧⲁ[ⲩϫ]ⲡ̣[ⲟϥ] <text:line-break/><text:span text:style-name="T1"> </text:span><text:span text:style-name="T2">(102/1) </text:span> ⲉⲩⲁⲧ’ϫⲡⲟϥ ⲡⲉ· ⲧⲁⲓ̈ ⲧⲉ ⲑⲉ ⲙ̅‐ <text:line-break/><text:span text:style-name="T1"> </text:span><text:span text:style-name="T2">(102/2) </text:span> ⲡⲉⲭ̅ⲥ̅ ⲉϣϫⲉ ⲥⲉⲁⲙⲁϩⲧⲉ ⲙⲉⲛ <text:line-break/><text:span text:style-name="T1"> </text:span><text:span text:style-name="T2">(102/3) </text:span> ⲙ̅ⲙⲟϥ· ⲕⲁⲧⲁ ⲧⲉϥϩⲩⲡⲟⲥⲧⲁ <text:line-break/><text:span text:style-name="T1"> </text:span><text:span text:style-name="T2">(102/4) </text:span> ⲥⲓⲥ ⲇⲉ ⲟⲩⲁⲧⲁⲙⲁϩⲧⲉ ⲙ̅ⲙⲟϥ <text:line-break/><text:span text:style-name="T1"> </text:span><text:span text:style-name="T2">(102/5) </text:span> ⲡⲉ· ⲡⲉⲭ̅ⲥ̅ ⲡⲉ ⲡⲧⲏⲣ̅ϥ̅· ⲡⲉⲧⲉ <text:line-break/><text:span text:style-name="T1"> </text:span><text:span text:style-name="T2">(102/6) </text:span> ⲡⲱϥ ⲁⲛ ⲡⲉ ⲡⲧⲏⲣ̅ϥ̅ ⲙ̅ⲛ̅ ϭⲟⲙ ⲛϥ̅‐ <text:line-break/><text:span text:style-name="T1"> </text:span><text:span text:style-name="T2">(102/7) </text:span> ⲥⲟⲩⲱⲛ ⲡⲉⲭ̅ⲥ̅· ⲡⲁϣⲏⲣⲉ ⲙ̅‐ <text:line-break/><text:span text:style-name="T1"> </text:span><text:span text:style-name="T2">(102/8) </text:span> ⲡ̅ⲣ̅ⲧⲟⲗⲙⲁ ⲉϫⲉ ϣⲁϫⲉ ϩⲁⲡⲣⲁ <text:line-break/><text:span text:style-name="T1"> </text:span><text:span text:style-name="T2">(102/9) </text:span> ⲙ̅ⲡⲁⲓ̈· ⲟⲩⲧⲉ ⲡⲛⲟⲩⲧⲉ ⲙ̅ⲡⲧⲏ <text:line-break/><text:span text:style-name="T1"> </text:span><text:span text:style-name="T2">(102/10) </text:span> ⲣ̅ϥ̅ ⲙ̅ⲡ̅ⲣ̅ⲕⲁⲁϥ ⲛⲁⲕ ⲛ̅ϩⲉⲛⲉⲓⲛⲉ <text:line-break/><text:span text:style-name="T1"> </text:span><text:span text:style-name="T2">(102/11) </text:span> ⲛ̅ϩⲏⲧ’· ⲡⲉⲧ’ⲕⲁⲧⲁⲕⲣⲓⲛⲉ ⲅⲁⲣ <text:line-break/><text:span text:style-name="T1"> </text:span><text:span text:style-name="T2">(102/12) </text:span> ⲉⲩⲁⲕⲣⲓⲛⲉ ⲙ̅ⲙⲟϥ ⲁⲛ ϩⲓ̅ⲧ̅ⲛ̅ ⲡⲉⲧ’‐ <text:line-break/><text:span text:style-name="T1"> </text:span><text:span text:style-name="T2">(102/13) </text:span> ⲕⲁⲧⲁⲕⲣⲓⲛⲉ· ⲛⲁⲛⲟⲩⲥ ⲙⲉⲛ <text:line-break/><text:span text:style-name="T1"> </text:span><text:span text:style-name="T2">(102/14) </text:span> ⲉϣⲓⲛⲉ ⲁⲩⲱ ⲉⲙ̅ⲙⲉ ϫⲉ ⲛⲓⲙ <text:line-break/><text:span text:style-name="T1"> </text:span><text:span text:style-name="T2">(102/15) </text:span> ⲡⲉ ⲡⲛⲟⲩⲧⲉ· ⲡⲗⲟⲅⲟⲥ ⲙ̅ⲛ̅ ⲡⲛⲟⲩⲥ <text:line-break/><text:span text:style-name="T1"> </text:span><text:span text:style-name="T2">(102/16) </text:span> ⲟⲩⲣⲁⲛ ⲛ̅ϩⲟⲟⲩⲧ’ ⲡⲉ· ⲡⲉⲧⲟⲩ‐ <text:line-break/><text:span text:style-name="T1"> </text:span><text:span text:style-name="T2">(102/17) </text:span> ⲱϣ ⲙⲉⲛ ⲁⲉⲓⲙⲉ ⲉⲧⲃⲉ ⲡⲁⲓ̈ ⲙⲁ <text:line-break/><text:span text:style-name="T1"> </text:span><text:span text:style-name="T2">(102/18) </text:span> ⲣⲉϥϣⲓⲛⲉ ϩ̅ⲛ̅ ⲟⲩⲥϭⲣⲁϩ̅ⲧ’̅ ⲙ̅ⲛ̅ ⲟⲩ‐ <text:line-break/><text:soft-page-break/><text:span text:style-name="T1"> </text:span><text:span text:style-name="T2">(102/19) </text:span> ϩ̅ⲣ̅ⲧⲉ· ⲟⲩϭⲓⲛⲇⲩⲛⲟⲥ ⲅⲁⲣ ϣⲏⲙ <text:line-break/><text:span text:style-name="T1"> </text:span><text:span text:style-name="T2">(102/20) </text:span> ⲁⲛ ⲡⲉ ⲉϣⲁϫⲉ ϩⲁⲡⲣⲁ ⲛ̅ⲛⲁⲓ̈· ⲉⲕ <text:line-break/><text:span text:style-name="T1"> </text:span><text:span text:style-name="T2">(102/21) </text:span> ⲥⲟⲟⲩⲛ ϫⲉ ⲥⲉⲛⲁϯ ϩⲁⲡ ⲉⲣⲟⲕ <text:line-break/><text:span text:style-name="T1"> </text:span><text:span text:style-name="T2">(102/22) </text:span> ϩⲁ ⲛⲉⲧ̅ⲕ̅ϫⲱ ⲙ̅ⲙⲟⲟⲩ ⲧⲏⲣⲟⲩ· <text:line-break/><text:span text:style-name="T1"> </text:span><text:span text:style-name="T2">(102/23) </text:span> ⲙ̅ⲙⲉ ⲇⲉ ϩ̅ⲙ̅ ⲡⲁⲓ̈ ϫⲉ ⲡⲉⲧ’ϩ̅ⲙ̅ <text:line-break/><text:span text:style-name="T1"> </text:span><text:span text:style-name="T2">(102/24) </text:span> ⲡⲕⲁⲕⲉ ⲛ̅ϥ̅ⲛⲁϣⲛⲁⲩ ⲁⲛ ⲉⲗⲁⲁⲩ <text:line-break/><text:span text:style-name="T1"> </text:span><text:span text:style-name="T2">(102/25) </text:span> ⲉϥⲧ̅ⲙ̅ϫⲓ ⲡⲟⲩⲟⲉⲓⲛ ⲛ̅ϥⲛⲁⲃⲁⲗ <text:line-break/><text:span text:style-name="T1"> </text:span><text:span text:style-name="T2">(102/26) </text:span> ⲛ̅ϩⲏⲧ̅ϥ̅· ⲁⲣⲓⲇⲟϭⲓⲙⲁⲍⲉ ⲙ̅ⲙⲟⲕ <text:line-break/><text:span text:style-name="T1"> </text:span><text:span text:style-name="T2">(102/27) </text:span> ⲉϣϫⲉ ϩⲟⲗⲱⲥ ⲟⲩⲛ̅ⲧⲁⲕ ⲙ̅ⲙⲁⲩ <text:line-break/><text:span text:style-name="T1"> </text:span><text:span text:style-name="T2">(102/28) </text:span> ⲙ̅ⲡⲟⲩⲟⲉⲓⲛ· ϫⲉⲕⲁⲁⲥ ⲉⲕϣⲁⲛ <text:line-break/><text:span text:style-name="T1"> </text:span><text:span text:style-name="T2">(102/29) </text:span> ϣⲓⲛⲉ ⲉⲧⲃⲉ ⲛⲁⲓ̈ ⲉⲕⲛⲁⲙ̅ⲙⲉ <text:line-break/><text:span text:style-name="T1"> </text:span><text:span text:style-name="T2">(102/30) </text:span> ϫⲉ ⲁϣ ⲧⲉ ⲑⲉ ⲉⲧ̅ⲕ̅ⲛⲁⲣ̅ ⲃⲟⲗ ⲙ̅‐ <text:line-break/><text:span text:style-name="T1"> </text:span><text:span text:style-name="T2">(102/31) </text:span> ⲙⲟⲥ· ⲟⲩⲛ̅ ϩⲁϩ ⲅⲁⲣ ϣⲓⲛⲉ ϩ̅ⲙ̅ <text:line-break/><text:span text:style-name="T1"> </text:span><text:span text:style-name="T2">(102/32) </text:span> ⲡⲕⲁⲕⲉ· ⲁⲩⲱ ⲥⲉϭⲟⲙϭ̅ⲙ̅ ⲉⲩ‐ <text:line-break/><text:span text:style-name="T1"> </text:span><text:span text:style-name="T2">(102/33) </text:span> ⲟⲩⲱϣ ⲉⲥⲟⲟⲩⲛ ⲉⲙⲡⲟⲩⲟ‐ <text:line-break/><text:span text:style-name="T1"> </text:span><text:span text:style-name="T2">(102/34) </text:span> ⲉⲓⲛ ⲕⲏ ⲛⲁⲩ ⲁⲛ ⲉϩⲣⲁⲓ̈· ⲡⲁ‐ <text:line-break/><text:span text:style-name="T1"> </text:span><text:span text:style-name="T2">(103/1) </text:span> ϣⲏⲣⲉ ⲙ̅ⲡ̅ⲣ̅ⲧⲣⲉⲡⲉⲕⲛⲟⲩⲥ ⲉⲓ‐ <text:line-break/><text:span text:style-name="T1"> </text:span><text:span text:style-name="T2">(103/2) </text:span> ⲱⲣ̅ⲙ̅ ⲉⲡⲥⲁ ⲛ̅ⲡⲓⲧ̅ⲛ̅· ⲁⲗⲗⲁ ⲙⲁⲗ‐ <text:line-break/><text:span text:style-name="T1"> </text:span><text:span text:style-name="T2">(103/3) </text:span> ⲗⲟⲛ ϩ̅ⲙ̅ ⲡⲟⲩⲟⲉⲓⲛ ⲙⲁⲣⲉϥϭⲱ‐ <text:line-break/><text:span text:style-name="T1"> </text:span><text:span text:style-name="T2">(103/4) </text:span> ϣ̅ⲧ̅’̅ ⲉⲛⲁ ⲡⲥⲁ ⲛⲧⲡⲉ· ⲡⲟⲩⲟⲉⲓⲛ <text:line-break/><text:span text:style-name="T1"> </text:span><text:span text:style-name="T2">(103/5) </text:span> ⲅⲁⲣ ⲉϥⲛ̅ⲛⲏⲩ ⲙ̅ⲡⲥⲁ ⲛⲧⲡⲉ ⲛ̅ⲟⲩ‐ <text:line-break/><text:span text:style-name="T1"> </text:span><text:span text:style-name="T2">(103/6) </text:span> ⲟⲉⲓϣ ⲛⲓⲙ· ⲕⲁⲛ ⲉϥϩ̅ⲓ̅ϫ̅ⲙ̅ ⲡⲕⲁϩ <text:line-break/><text:span text:style-name="T1"> </text:span><text:span text:style-name="T2">(103/7) </text:span> ⲙⲁⲣⲉϥϣⲓⲛⲉ ⲛ̅ⲥⲁ ⲡⲱⲧ’ ⲛ̅ⲥⲁ‐ <text:line-break/><text:span text:style-name="T1"> </text:span><text:span text:style-name="T2">(103/8) </text:span> ⲛⲁ ⲧⲡⲉ· ⲁⲣⲓ ⲟⲩⲟⲉⲓⲛ ⲉⲡⲉⲕ‐ <text:line-break/><text:span text:style-name="T1"> </text:span><text:span text:style-name="T2">(103/9) </text:span> ⲛⲟⲩⲥ ϩ̅ⲙ̅ ⲡⲟⲩⲟⲉⲓⲛ ⲛ̅ⲧⲡⲉ· <text:line-break/><text:span text:style-name="T1"> </text:span><text:span text:style-name="T2">(103/10) </text:span> ϫⲉⲕⲁⲁⲥ ⲉⲕⲛⲁⲡⲱⲱⲛⲉ ⲉϩⲟⲩⲛ <text:line-break/><text:span text:style-name="T1"> </text:span><text:span text:style-name="T2">(103/11) </text:span> ⲉⲡⲟⲩⲟⲉⲓⲛ ⲛ̅ⲧⲡⲉ· ⲙ̅ⲡ̅ⲣ̅ϩ̅ⲓ̅ⲥⲉ <text:line-break/><text:span text:style-name="T1"> </text:span><text:span text:style-name="T2">(103/12) </text:span> ⲉⲕⲧⲱϩ̅ⲙ̅ ⲉϩⲟⲩⲛ ⲉⲡⲣⲟ ⲙ̅ⲡⲗⲟ‐ <text:line-break/><text:span text:style-name="T1"> </text:span><text:span text:style-name="T2">(103/13) </text:span> ⲅⲟⲥ· ⲁⲩⲱ ⲙ̅ⲡ̅ⲣ̅ⲕⲁ ⲧⲟⲟⲧⲕ̅ ⲉ‐ <text:line-break/><text:span text:style-name="T1"> </text:span><text:span text:style-name="T2">(103/14) </text:span> ⲃⲟⲗ ⲉⲕⲙⲟⲟϣⲉ ϩ̅ⲓ̅ ⲑⲓⲏ ⲙ̅ⲡⲉ‐ <text:line-break/><text:span text:style-name="T1"> </text:span><text:span text:style-name="T2">(103/15) </text:span> ⲭ̅ⲥ̅· ⲙⲟⲟϣⲉ ⲛ̅ϩⲏⲧⲥ̅ ϫⲉⲕⲁ‐ <text:line-break/><text:span text:style-name="T1"> </text:span><text:span text:style-name="T2">(103/16) </text:span> ⲁⲥ ⲉⲕⲛⲁϫⲓ ⲡⲉⲙⲧⲟⲛ ⲛ̅ⲛⲉⲕ‐ <text:line-break/><text:span text:style-name="T1"> </text:span><text:span text:style-name="T2">(103/17) </text:span> ϩ̅ⲓ̅ⲥⲉ· ⲉⲕϣⲁⲛⲙⲟⲟϣⲉ ϩ̅ⲛ̅ ⲕⲉ‐ <text:line-break/><text:span text:style-name="T1"> </text:span><text:span text:style-name="T2">(103/18) </text:span> ⲟⲩ{ⲉ̅ⲓ} ⲧⲉϩ̅ⲓ̅ⲏ ⲉⲧ̅ⲕ̅ⲛⲁⲁⲁⲥ ⲙ̅ⲙ̅ⲛ̅‐ <text:line-break/><text:span text:style-name="T1"> </text:span><text:span text:style-name="T2">(103/19) </text:span> ϩⲏⲩ ⲛ̅ϩⲏⲧⲥ̅· ⲕⲁⲓ ⲅⲁⲣ ⲛⲉⲧ’ⲙⲟ‐ <text:line-break/><text:span text:style-name="T1"> </text:span><text:span text:style-name="T2">(103/20) </text:span> ⲟϣⲉ ϩ̅ⲓ̅ ⲧⲉϩ̅ⲓ̅ⲏ ⲉⲧⲟⲩⲉⲥⲧⲱⲛ <text:line-break/><text:span text:style-name="T1"> </text:span><text:span text:style-name="T2">(103/21) </text:span> ⲧⲉⲩϩⲁⲏ ⲉⲩⲛⲁⲃⲱⲕ ⲉⲡⲓⲧ̅ⲛ̅ <text:line-break/><text:span text:style-name="T1"> </text:span><text:span text:style-name="T2">(103/22) </text:span> ⲉⲡⲧⲁⲕⲟ ⲙ̅ⲡⲃⲟⲣⲃⲟⲣⲟⲥ· ⲉⲙ̅ⲛ̅‐ <text:line-break/><text:span text:style-name="T1"> </text:span><text:span text:style-name="T2">(103/23) </text:span> ⲧⲉ ⲅⲁⲣ ⲟⲩⲟϣ̅ⲥ̅ ⲉⲃⲟⲗ ⲛ̅ⲧⲯⲩⲭⲏ <text:line-break/><text:span text:style-name="T1"> </text:span><text:span text:style-name="T2">(103/24) </text:span> ⲁⲩⲱ ⲡⲧⲟⲡⲟⲥ ⲙ̅ⲡⲧⲁⲕⲟ ϥⲟⲩ‐ <text:line-break/><text:span text:style-name="T1"> </text:span><text:span text:style-name="T2">(103/25) </text:span> ⲉⲥⲧⲱⲛ· ϫⲓ ⲉⲣⲟⲕ ⲙ̅ⲡⲉⲭ̅ⲥ̅ <text:line-break/><text:span text:style-name="T1"> </text:span><text:span text:style-name="T2">(103/26) </text:span> ⲧⲉϩ̅ⲓ̅ⲏ ⲉⲧ’ⲗⲟϫ̅ϩ̅· ϥ̅ⲣ̅ⲑⲗⲓⲃⲉ ⲅⲁⲣ <text:line-break/><text:span text:style-name="T1"> </text:span><text:span text:style-name="T2">(103/27) </text:span> ⲁⲩⲱ ϥ̅ϥⲓ ⲙⲟⲕϩ̅ⲥ̅ ⲉⲧⲃⲉ ⲡⲉⲕ‐ <text:line-break/><text:span text:style-name="T1"> </text:span><text:span text:style-name="T2">(103/28) </text:span> ⲛⲟⲃⲉ· ⲱ͂ ⲧⲯⲩⲭⲏ ⲧⲣⲉϥϩⲩⲡⲟ‐ <text:line-break/><text:span text:style-name="T1"> </text:span><text:span text:style-name="T2">(103/29) </text:span> ⲙⲓⲛⲉ ⲉⲣⲉϣⲟⲟⲡ ϩ̅ⲛ̅ ⲁϣ ⲙ̅‐ <text:line-break/><text:span text:style-name="T1"> </text:span><text:span text:style-name="T2">(103/30) </text:span> ⲙ̅ⲛ̅ⲧ̅’̅ⲁⲧ’ⲥⲟⲟⲩⲛ· ⲛⲓⲙ ⲅⲁⲣ <text:line-break/><text:span text:style-name="T1"> </text:span><text:span text:style-name="T2">(103/31) </text:span> ⲡⲉ ⲡⲣⲉϥϫⲓ ⲙⲟⲉⲓⲧ’ ϩⲏⲧⲉ ⲉ‐ <text:line-break/><text:soft-page-break/><text:span text:style-name="T1"> </text:span><text:span text:style-name="T2">(103/32) </text:span> ϩⲟⲩⲛ ⲉⲡⲕⲁⲕⲉ· ⲟⲩⲏⲣ ⲛ̅ⲉⲓ‐ <text:line-break/><text:span text:style-name="T1"> </text:span><text:span text:style-name="T2">(103/33) </text:span> ⲛⲉ ⲁⲡⲉⲭ̅ⲥ̅ ϫⲓⲧⲟⲩ ⲉⲧⲃⲏⲧⲉ <text:line-break/><text:span text:style-name="T1"> </text:span><text:span text:style-name="T2">(103/34) </text:span> ⲉϥϣⲟⲟⲡ ⲛ̅ⲛⲟⲩⲧⲉ ⲁ[ϥ]ϭⲟ̣[ⲓⲗ]ⲉ <text:line-break/><text:span text:style-name="T1"> </text:span><text:span text:style-name="T2">(104/1) </text:span> ⲙ̅ⲙⲟϥ ϩ̅ⲛ̅ ⲛ̅ⲣⲱⲙⲉ ϩⲱⲥ ⲣⲱⲙⲉ· <text:line-break/><text:span text:style-name="T1"> </text:span><text:span text:style-name="T2">(104/2) </text:span> ⲁϥⲃⲱⲕ ⲉⲡⲓⲧ̅ⲛ̅ ⲁⲉⲙ̅ⲛ̅ⲧⲉ ⲁϥⲃⲱⲗ <text:line-break/><text:span text:style-name="T1"> </text:span><text:span text:style-name="T2">(104/3) </text:span> ⲉⲃⲟⲗ ⲛ̅ⲛ̅ⲙ̅ⲙⲓⲥⲉ ⲙ̅ⲡⲙⲟⲩ· ⲁⲩ‐ <text:line-break/><text:span text:style-name="T1"> </text:span><text:span text:style-name="T2">(104/4) </text:span> ϯ ⲛⲁⲁⲕⲉ ⲙ̅ⲙⲟⲟⲩ ⲕⲁⲧⲁ ⲑⲉ ⲛ̅ⲧⲁ‐ <text:line-break/><text:span text:style-name="T1"> </text:span><text:span text:style-name="T2">(104/5) </text:span> ⲧⲉⲅⲣⲁⲫⲏ ⲙ̅ⲡⲛⲟⲩⲧⲉ ϫⲟⲟⲥ· ⲁⲩ‐ <text:line-break/><text:span text:style-name="T1"> </text:span><text:span text:style-name="T2">(104/6) </text:span> ⲱ ⲁϥⲣ̅ⲥⲫⲣⲁⲅⲓⲍⲉ ⲙ̅ⲫⲏⲧ’ ϩⲣⲁⲓ̈ ⲛ̅‐ <text:line-break/><text:span text:style-name="T1"> </text:span><text:span text:style-name="T2">(104/7) </text:span> ϩⲏⲧ̅ϥ̅· ⲁⲩⲱ ⲛⲉϥⲡⲓⲧⲉ ⲉⲧ’ϫⲟⲟⲣ <text:line-break/><text:span text:style-name="T1"> </text:span><text:span text:style-name="T2">(104/8) </text:span> ⲁϥϩⲟϣϥⲟⲩ ⲉⲙⲁⲧⲉ· ⲁⲩⲱ ⲛ̅ⲇⲩ‐ <text:line-break/><text:span text:style-name="T1"> </text:span><text:span text:style-name="T2">(104/9) </text:span> ⲛⲁⲙⲓⲥ ⲧⲏⲣⲟⲩ ⲛ̅ⲧⲁⲣⲟⲩⲛⲁⲩ <text:line-break/><text:span text:style-name="T1"> </text:span><text:span text:style-name="T2">(104/10) </text:span> ⲉⲣⲟϥ ⲁⲩⲡⲱⲧ’· ϫⲉⲕⲁⲁⲥ ⲛ̅ⲧⲟⲕ <text:line-break/><text:span text:style-name="T1"> </text:span><text:span text:style-name="T2">(104/11) </text:span> ⲡⲧⲁⲗⲁⲓⲡⲱⲣⲟⲥ ⲉϥⲛⲁⲛ̅ⲧ̅ⲕ̅ ⲉ‐ <text:line-break/><text:span text:style-name="T1"> </text:span><text:span text:style-name="T2">(104/12) </text:span> ϩⲣⲁⲓ̈ ϩ̅ⲙ̅ ⲡⲛⲟⲩⲛ ⲛ̅ϥ̅ⲙⲟⲩ ϩⲁⲣⲟⲕ <text:line-break/><text:span text:style-name="T1"> </text:span><text:span text:style-name="T2">(104/13) </text:span> ⲛ̅ⲥⲱⲧⲉ ⲙ̅ⲡⲉⲕⲛⲟⲃⲉ· ⲁϥⲛⲁϩ <text:line-break/><text:span text:style-name="T1"> </text:span><text:span text:style-name="T2">(104/14) </text:span> ⲙⲉⲕ ⲉⲧ’ϭⲓϫ ⲉⲧ’ϫⲟⲟⲣ ⲛ̅ⲉⲙ̅ⲛ̅ⲧⲉ <text:line-break/><text:span text:style-name="T1"> </text:span><text:span text:style-name="T2">(104/15) </text:span> ⲛ̅ⲧⲟⲕ ⲇⲉ ϩⲱⲱⲕ ⲙⲟⲅⲓⲥ ϯ ⲧⲉⲕ‐ <text:line-break/><text:span text:style-name="T1"> </text:span><text:span text:style-name="T2">(104/16) </text:span> ⲡⲣⲟϩⲉⲣⲉⲥⲓⲥ ⲛⲁϥ ϩ̅ⲓ̅ⲧ̅ⲛ̅ ⲟⲩⲓ̈ⲭⲛⲟⲥ· <text:line-break/><text:span text:style-name="T1"> </text:span><text:span text:style-name="T2">(104/17) </text:span> ϫⲉⲕⲁⲁⲥ ⲉϥⲛⲁϫⲓⲧ̅ⲕ̅ ⲉϩⲣⲁⲓ̈ ϩ̅ⲓ̅‐ <text:line-break/><text:span text:style-name="T1"> </text:span><text:span text:style-name="T2">(104/18) </text:span> ⲧ̅ⲛ̅ ⲟⲩⲣⲁϣⲉ· ⲧⲡⲣⲟϩⲉⲣⲉⲥⲓⲥ ⲇⲉ <text:line-break/><text:span text:style-name="T1"> </text:span><text:span text:style-name="T2">(104/19) </text:span> ⲡⲉ ⲡⲇⲱⲣⲟⲛ ⲙ̅ⲡⲉⲭ̅ⲥ̅ ⲉⲧⲉ ⲡⲑ̅ⲃ̅‐ <text:line-break/><text:span text:style-name="T1"> </text:span><text:span text:style-name="T2">(104/20) </text:span> ⲃⲓⲟ ⲛ̅ϩⲏⲧ’ ⲡⲉ· ⲟⲩⲥⲓⲁ ⲉⲧ’ϣⲏⲡ <text:line-break/><text:span text:style-name="T1"> </text:span><text:span text:style-name="T2">(104/21) </text:span> ⲡⲉ ⲟⲩϩⲏⲧ’ ⲉϥⲧ̅ⲛ̅ⲛⲟⲉⲓⲧ’· ⲉⲕ‐ <text:line-break/><text:span text:style-name="T1"> </text:span><text:span text:style-name="T2">(104/22) </text:span> ϣⲁⲛⲑ̅ⲃ̅ⲃⲓⲟ ⲉⲩⲛⲁϫⲉⲥⲧ̅ⲕ̅ ⲛ̅‐ <text:line-break/><text:span text:style-name="T1"> </text:span><text:span text:style-name="T2">(104/23) </text:span> ϩⲟⲩⲟ̅· ⲁⲩⲱ ⲉⲕϣⲁⲛϫⲁⲥⲧ̅ⲕ̅ <text:line-break/><text:span text:style-name="T1"> </text:span><text:span text:style-name="T2">(104/24) </text:span> ⲥⲉⲛⲁⲑ̅ⲃ̅ⲃⲓⲟ ⲉⲙⲁⲧⲉ· ⲡⲁϣⲏ‐ <text:line-break/><text:span text:style-name="T1"> </text:span><text:span text:style-name="T2">(104/25) </text:span> ⲣⲉ ϩⲁⲣⲉϩ ⲉⲣⲟⲕ ⲉⲧⲡⲟⲛⲏⲣⲓⲁ· <text:line-break/><text:span text:style-name="T1"> </text:span><text:span text:style-name="T2">(104/26) </text:span> ⲁⲩⲱ ⲡⲉⲡ̅ⲛ̅ⲁ̅ ⲛ̅ⲧⲡⲟⲛⲏⲣⲓⲁ ⲙ̅‐ <text:line-break/><text:span text:style-name="T1"> </text:span><text:span text:style-name="T2">(104/27) </text:span> ⲡ̅ⲣ̅ⲧⲣⲉϥⲛⲟϫ̅ⲕ̅ ⲉⲡⲓⲧ̅ⲛ̅ ⲉⲡⲛⲟⲩⲛ· <text:line-break/><text:span text:style-name="T1"> </text:span><text:span text:style-name="T2">(104/28) </text:span> ϥⲗⲟⲃⲉ ⲅⲁⲣ ⲁⲩⲱ ϥ̅ⲥⲁϣⲉ· ⲟⲩ‐ <text:line-break/><text:span text:style-name="T1"> </text:span><text:span text:style-name="T2">(104/29) </text:span> ⲥⲧⲣ̅ⲧⲣ̅ ⲡⲉ· ⲁⲩⲱ ϥⲛⲟⲩϫⲉ ⲛ̅ <text:line-break/><text:span text:style-name="T1"> </text:span><text:span text:style-name="T2">(104/30) </text:span> ⲟⲩⲟⲛ ⲛⲓⲙ ⲉⲡⲓⲧ̅ⲛ̅ ⲉⲩϩ̅ⲓ̅ⲉⲓⲧ’ <text:line-break/><text:span text:style-name="T1"> </text:span><text:span text:style-name="T2">(104/31) </text:span> ⲛ̅ⲧⲉ ⲡⲃⲟⲣⲃⲟⲣⲟⲥ· ⲟⲩⲛⲟϭ ⲛ̅‐ <text:line-break/><text:span text:style-name="T1"> </text:span><text:span text:style-name="T2">(104/32) </text:span> ϩⲱⲃ ⲉⲛⲁⲛⲟⲩϥ ⲡⲉ ⲉⲧ̅ⲙ̅ⲙⲣ̅‐ <text:line-break/><text:span text:style-name="T1"> </text:span><text:span text:style-name="T2">(104/33) </text:span> ⲣⲉ ⲧⲡⲟⲣⲛⲓⲁ· ⲁⲩⲱ ⲉⲧ̅ⲙ̅ⲣ̅ ⲡⲙⲉ‐ <text:line-break/><text:span text:style-name="T1"> </text:span><text:span text:style-name="T2">(104/34) </text:span> [ⲉ]ⲩ[ⲉ] ⲛ̅ⲧ̅’̅ⲁⲗⲁⲓⲡⲱⲣⲟⲥ ⲣⲱ‐ <text:line-break/><text:span text:style-name="T1"> </text:span><text:span text:style-name="T2">(105/1) </text:span> ⲧⲏⲣ̅ϥ̅· ⲁⲣ̅ⲡⲉⲥⲙⲉⲉⲩⲉ ⲅⲁⲣ ⲡⲙⲟⲩ <text:line-break/><text:span text:style-name="T1"> </text:span><text:span text:style-name="T2">(105/2) </text:span> ⲡⲉ· ⲛ̅ⲥ̅ⲣ̅ ⲛⲟϥⲣⲉ ⲇⲉ ⲁⲛ ⲛ̅ⲣⲱ‐ <text:line-break/><text:span text:style-name="T1"> </text:span><text:span text:style-name="T2">(105/3) </text:span> ⲙⲉ ⲛⲓⲙ ⲉϩⲉ ⲉϩⲣⲁⲓ̈ ⲉⲡⲙⲟⲩ· <text:line-break/><text:span text:style-name="T1"> </text:span><text:span text:style-name="T2">(105/4) </text:span> ⲟⲩⲯⲩⲭⲏ ⲅⲁⲣ ⲉⲁⲩϩⲉ ⲉⲣⲟⲥ ϩ̅ⲙ̅ <text:line-break/><text:span text:style-name="T1"> </text:span><text:span text:style-name="T2">(105/5) </text:span> ⲡⲙⲟⲩ ⲥⲛⲁϣⲱⲡⲉ ⲛ̅ⲁⲗⲟⲅⲟⲥ· <text:line-break/><text:span text:style-name="T1"> </text:span><text:span text:style-name="T2">(105/6) </text:span> ⲛⲁⲛⲟⲩⲥ ⲅⲁⲣ ⲉⲧ̅ⲙ̅ⲱⲛ̅ϩ̅ ⲛ̅ϩⲟⲩ‐ <text:line-break/><text:span text:style-name="T1"> </text:span><text:span text:style-name="T2">(105/7) </text:span> ⲟ͂ ⲉϫⲡⲉ ⲟⲩⲱⲛ̅ϩ̅ ⲛ̅ⲧⲃ̅ⲛⲏ· ⲁⲣⲓ <text:line-break/><text:span text:style-name="T1"> </text:span><text:span text:style-name="T2">(105/8) </text:span> ⲧⲏⲣⲓ ⲙ̅ⲙⲟⲕ ⲙⲏⲡⲱⲥ ⲛ̅ⲅ̅ⲣⲱⲕ̅ϩ̅ <text:line-break/><text:span text:style-name="T1"> </text:span><text:span text:style-name="T2">(105/9) </text:span> ϩ̅ⲛ̅ ⲛ̅ⲥⲟⲧⲉ ⲛ̅ⲧⲡⲟⲣⲛⲓⲁ· ⲟⲩⲛ̅ <text:line-break/><text:span text:style-name="T1"> </text:span><text:span text:style-name="T2">(105/10) </text:span> ϩⲁϩ ⲅⲁⲣ ⲛ̅ⲣⲉϥϫⲁⲗ̅ⲕ̅ ⲥⲟⲧⲉ ⲉⲩⲟ̅‐ <text:line-break/><text:soft-page-break/><text:span text:style-name="T1"> </text:span><text:span text:style-name="T2">(105/11) </text:span> ⲛⲁⲥ ⲛ̅ϩⲩⲡⲏⲣⲉⲧⲏⲥ· ⲛⲁⲓ̈ ⲉⲧ̅ⲕ̅‐ <text:line-break/><text:span text:style-name="T1"> </text:span><text:span text:style-name="T2">(105/12) </text:span> ⲥⲟⲟⲩⲛ ⲁⲛ ⲙ̅ⲙⲟⲟⲩ ⲉⲩϣⲟⲟⲡ <text:line-break/><text:span text:style-name="T1"> </text:span><text:span text:style-name="T2">(105/13) </text:span> ⲛⲁⲕ ⲛ̅ϫⲁϫⲉ· ⲱ͂ ⲡⲁϣⲏⲣⲉ ⲑ̅ⲃ̅‐ <text:line-break/><text:span text:style-name="T1"> </text:span><text:span text:style-name="T2">(105/14) </text:span> ⲥⲱ ⲛ̅ⲁⲥ ⲛ̅ⲧⲡⲟⲣⲛⲓⲁ ⲕⲁⲁⲕ ⲁϩⲏ‐ <text:line-break/><text:span text:style-name="T1"> </text:span><text:span text:style-name="T2">(105/15) </text:span> ⲟⲩ ⲙ̅ⲙⲟⲥ· ⲛ̅ⲅ̅ϯ ϩ̅ⲓ̅ⲱⲱⲕ ⲛ̅ⲧ’̅‐ <text:line-break/><text:span text:style-name="T1"> </text:span><text:span text:style-name="T2">(105/16) </text:span> ϣⲧⲏⲛ ⲉⲧ’ⲣⲁϩⲉ ⲉⲧⲡ̅ⲣ̅ⲣⲓⲱⲟⲩ <text:line-break/><text:span text:style-name="T1"> </text:span><text:span text:style-name="T2">(105/17) </text:span> ⲉⲛⲉⲥⲱⲕ ϩⲣⲁⲓ̈ ⲛ̅ϩⲏⲧ̅ⲥ̅· ⲉⲩⲛ̅‐ <text:line-break/><text:span text:style-name="T1"> </text:span><text:span text:style-name="T2">(105/18) </text:span> ⲧⲁⲕ ⲇⲉ ⲙ̅ⲙⲁⲩ ⲛ̅ϯϩ̅ⲃ̅ⲥⲱ ⲁⲣⲓ <text:line-break/><text:span text:style-name="T1"> </text:span><text:span text:style-name="T2">(105/19) </text:span> ⲧⲏⲣⲓ ⲙ̅ⲙⲟⲥ ⲕⲁⲗⲱⲥ· ⲃⲟⲗ̅ⲕ̅ ⲉⲃⲟⲗ <text:line-break/><text:span text:style-name="T1"> </text:span><text:span text:style-name="T2">(105/20) </text:span> ϩ̅ⲛ̅ ⲙ̅ⲣ̅ⲣⲉ ⲛⲓⲙ ϫⲉⲕⲁⲁⲥ ⲉⲕⲛⲁ‐ <text:line-break/><text:span text:style-name="T1"> </text:span><text:span text:style-name="T2">(105/21) </text:span> ϫⲡⲟ ⲛⲁⲕ ⲛ̅ⲟⲩⲙ̅ⲛ̅ⲧ̅’̅ⲉⲗⲉⲩⲑⲉ‐ <text:line-break/><text:span text:style-name="T1"> </text:span><text:span text:style-name="T2">(105/22) </text:span> ⲣⲟⲥ· ⲉⲕϣⲁⲛⲛⲟⲩϫⲉ ⲉⲃⲟⲗ <text:line-break/><text:span text:style-name="T1"> </text:span><text:span text:style-name="T2">(105/23) </text:span> ⲙ̅ⲙⲟⲕ ⲛ̅ⲧⲉⲡⲓⲑⲩⲙⲓⲁ ⲉⲧⲉ <text:line-break/><text:span text:style-name="T1"> </text:span><text:span text:style-name="T2">(105/24) </text:span> ⲛⲁϣⲉ ⲛⲉⲥⲕⲟⲧ̅ⲥ̅· ⲁⲩⲱ ⲛ̅ⲅ̅ <text:line-break/><text:span text:style-name="T1"> </text:span><text:span text:style-name="T2">(105/25) </text:span> ⲃⲟⲗⲉⲕ ⲉⲃⲟⲗ ϩ̅ⲛ̅ ⲛ̅ⲛⲟⲃⲉ ⲛ̅ⲑⲏ‐ <text:line-break/><text:span text:style-name="T1"> </text:span><text:span text:style-name="T2">(105/26) </text:span> ⲇⲟⲛⲏ· ⲥⲱⲧ̅ⲙ̅ ⲧⲯⲩⲭⲏ ⲉⲧⲁ‐ <text:line-break/><text:span text:style-name="T1"> </text:span><text:span text:style-name="T2">(105/27) </text:span> ⲥⲩⲙⲃⲟⲩⲗⲉⲓⲁ· ⲙ̅ⲡ̅ⲣ̅ϣⲱⲡⲉ <text:line-break/><text:span text:style-name="T1"> </text:span><text:span text:style-name="T2">(105/28) </text:span> ⲛ̅ⲃⲏⲃ ⲛ̅ⲃⲁϣⲟⲣ ⲙ̅ⲛ̅ ⲛ̅ϩⲟϥ· ⲟⲩ‐ <text:line-break/><text:span text:style-name="T1"> </text:span><text:span text:style-name="T2">(105/29) </text:span> ⲇⲉ ⲛ̅ϣⲕⲟⲗ ⲛ̅ⲛ̅ⲇⲣⲁⲕⲱⲛ ⲙ̅ⲛ̅ <text:line-break/><text:span text:style-name="T1"> </text:span><text:span text:style-name="T2">(105/30) </text:span> ⲛ̅ϩⲃⲱ· ⲟⲩⲇⲉ ⲙ̅ⲙⲁ ⲛ̅ϣⲱ‐ <text:line-break/><text:span text:style-name="T1"> </text:span><text:span text:style-name="T2">(105/31) </text:span> ⲡⲉ ⲛ̅ⲛ̅ⲙ̅ⲙⲟⲩⲉⲓ· ⲏ%0 ⲙⲁ ⲙ̅ⲡⲱⲧ <text:line-break/><text:span text:style-name="T1"> </text:span><text:span text:style-name="T2">(105/32) </text:span> ⲛ̅ⲛ̅ϩⲟϥ ⲛ̅ⲥⲓⲧ’· ⲉⲣϣⲁⲛ ⲛⲁⲓ̈ <text:line-break/><text:span text:style-name="T1"> </text:span><text:span text:style-name="T2">(105/33) </text:span> ϣⲱⲡⲉ ⲛⲉ ⲱ͂ ⲧⲯⲩⲭⲏ ⲟⲩ ⲡⲉ‐ <text:line-break/><text:span text:style-name="T1"> </text:span><text:span text:style-name="T2">(105/34) </text:span> ⲧⲉⲛⲁⲁⲁϥ· ⲛⲁⲓ̈ ⲅⲁⲣ ⲛⲉ ⲛ̣̅ⲇ̣ⲩ̣‐ <text:line-break/><text:span text:style-name="T1"> </text:span><text:span text:style-name="T2">(106/1) </text:span> ⲛⲁⲙⲓⲥ ⲙ̅ⲡⲁⲛⲧⲓⲕⲓⲙⲉⲛⲟⲥ <text:line-break/><text:span text:style-name="T1"> </text:span><text:span text:style-name="T2">(106/2) </text:span> ⲛ̅ⲕⲁ ⲛⲓⲙ ⲉϥⲙⲟⲟⲩⲧ’ ⲉⲩⲛ̅ⲛⲏ‐ <text:line-break/><text:span text:style-name="T1"> </text:span><text:span text:style-name="T2">(106/3) </text:span> ⲟⲩ ⲉϩⲟⲩⲛ ⲉⲣⲟ ϩ̅ⲓ̅ⲧ̅ⲛ̅ ⲛⲁⲓ̈· ⲧⲟⲩ‐ <text:line-break/><text:span text:style-name="T1"> </text:span><text:span text:style-name="T2">(106/4) </text:span> ϩⲣⲉ ⲅⲁⲣ ⲧⲉ ⲛ̅ⲕⲁ ⲛⲓⲙ ⲉϥⲙⲟⲟⲩⲧ’ <text:line-break/><text:span text:style-name="T1"> </text:span><text:span text:style-name="T2">(106/5) </text:span> ϩ̅ⲓ̅ ⲁⲕⲁⲑⲁⲣⲥⲓⲁ ⲛⲓⲙ· ⲉⲣⲉⲛⲁⲓ̈ ⲅⲁⲣ <text:line-break/><text:span text:style-name="T1"> </text:span><text:span text:style-name="T2">(106/6) </text:span> ϣⲟⲟⲡ ⲛ̅ϩⲣⲁⲓ̈ ⲛ̅ϩⲏⲧⲉ ⲛⲓⲙ ⲉⲧⲟ‐ <text:line-break/><text:span text:style-name="T1"> </text:span><text:span text:style-name="T2">(106/7) </text:span> ⲛ̅ϩ̅ ⲡⲉ ⲉⲧ̅ⲛ̅ⲛⲏⲩ ⲉϩⲟⲩⲛ ϣⲁⲣⲟ· <text:line-break/><text:span text:style-name="T1"> </text:span><text:span text:style-name="T2">(106/8) </text:span> ⲥⲉⲛⲁϫⲓⲧⲉ ⲛ̅ⲃⲟⲧⲉ ⲛ̅ϭⲓ ⲛ̅ⲁⲅⲅⲉ‐ <text:line-break/><text:span text:style-name="T1"> </text:span><text:span text:style-name="T2">(106/9) </text:span> ⲗⲟⲥ ⲉⲧⲟⲛ̅ϩ̅· ⲛⲉⲣⲉϣⲟⲟⲡ ⲡⲉ <text:line-break/><text:span text:style-name="T1"> </text:span><text:span text:style-name="T2">(106/10) </text:span> ⲛ̅ⲣ̅ⲡⲉ ⲁⲣⲉⲁⲁⲧⲉ ⲛ̅ⲧⲁⲫⲟⲥ· ⲁⲗⲟ‐ <text:line-break/><text:span text:style-name="T1"> </text:span><text:span text:style-name="T2">(106/11) </text:span> ⲉⲣⲉⲉ ⲛ̅ⲧⲁⲫⲟⲥ ⲛ̅ⲧⲉϣⲱⲡⲉ <text:line-break/><text:span text:style-name="T1"> </text:span><text:span text:style-name="T2">(106/12) </text:span> ⲛ̅ⲣ̅ⲡⲉ· ϫⲉⲕⲁⲁⲥ ⲉⲡⲥⲟⲟⲩⲧ̅ⲛ̅ <text:line-break/><text:span text:style-name="T1"> </text:span><text:span text:style-name="T2">(106/13) </text:span> ⲙ̅ⲛ̅ ⲧⲙ̅ⲛⲧ’̅ⲛⲟⲩⲧⲉ ⲛⲁϭⲱ ⲛ̅ϩⲏ‐ <text:line-break/><text:span text:style-name="T1"> </text:span><text:span text:style-name="T2">(106/14) </text:span> ⲧⲉ· ⲡⲟⲩⲟⲉⲓⲛ ⲉⲧ̅ⲛ̅ϩⲏⲧⲉ ϫⲉ <text:line-break/><text:span text:style-name="T1"> </text:span><text:span text:style-name="T2">(106/15) </text:span> ⲣⲱϥ ⲙ̅ⲡ̅ⲣ̅ϫⲛⲁϥ· ⲙⲁⲣⲉⲗⲁⲁⲩ ⲅⲁⲣ <text:line-break/><text:span text:style-name="T1"> </text:span><text:span text:style-name="T2">(106/16) </text:span> ϫⲉⲣⲉ ϩⲏⲃⲉⲥ ⲉⲑⲏⲣⲓⲟⲛ ⲟⲩⲧⲉ <text:line-break/><text:span text:style-name="T1"> </text:span><text:span text:style-name="T2">(106/17) </text:span> ⲉⲛⲉⲩϣⲏⲣⲉ· ⲛⲉⲕⲣⲉϥⲙⲟⲟⲩⲧ <text:line-break/><text:span text:style-name="T1"> </text:span><text:span text:style-name="T2">(106/18) </text:span> ⲛ̅ⲧⲁⲩⲙⲟⲩ ⲧⲱⲱⲛ ⲙ̅ⲙⲟⲟⲩ· <text:line-break/><text:span text:style-name="T1"> </text:span><text:span text:style-name="T2">(106/19) </text:span> ⲛⲉⲩⲟⲛ̅ϩ̅ ⲅⲁⲣ ⲛ̅ⲧⲁⲩⲙⲟⲩ ⲉⲧⲃⲏ‐ <text:line-break/><text:span text:style-name="T1"> </text:span><text:span text:style-name="T2">(106/20) </text:span> ⲏⲧ̅ⲕ̅· ⲙⲁϯ ⲛⲁⲩ ⲙ̅ⲡⲱⲛ̅ϩ̅· ⲡⲁ‐ <text:line-break/><text:span text:style-name="T1"> </text:span><text:span text:style-name="T2">(106/21) </text:span> ⲗⲓⲛ ⲥⲉⲛⲁⲱⲛ̅ϩ̅· ⲡϣⲏⲛ ⲅⲁⲣ ⲙ̅‐ <text:line-break/><text:span text:style-name="T1"> </text:span><text:span text:style-name="T2">(106/22) </text:span> ⲡⲱⲛ̅ϩ̅ ⲡⲉ ⲡⲉⲭ̅ⲥ̅ ⲛ̅ⲧⲟϥ ⲡⲉ ⲧ’‐ <text:line-break/><text:span text:style-name="T1"> </text:span><text:span text:style-name="T2">(106/23) </text:span> ⲥⲟϥⲓⲁ· ⲛ̅ⲧⲟϥ ⲅⲁⲣ ⲡⲉ ⲧⲥⲟⲫⲓⲁ <text:line-break/><text:soft-page-break/><text:span text:style-name="T1"> </text:span><text:span text:style-name="T2">(106/24) </text:span> ⲛ̅ⲧⲟϥ ⲟⲛ ⲡⲉ ⲡⲗⲟⲅⲟⲥ· ⲛ̅ⲧⲟϥ <text:line-break/><text:span text:style-name="T1"> </text:span><text:span text:style-name="T2">(106/25) </text:span> ⲡⲉ ⲡⲱⲛ̅ϩ̅ ⲁⲩⲱ ⲧⲇⲩⲛⲁⲙⲓⲥ· <text:line-break/><text:span text:style-name="T1"> </text:span><text:span text:style-name="T2">(106/26) </text:span> ⲁⲩⲱ ⲡⲣⲟ· ⲛ̅ⲧⲟϥ ⲡⲉ ⲡⲟⲩⲟ‐ <text:line-break/><text:span text:style-name="T1"> </text:span><text:span text:style-name="T2">(106/27) </text:span> ⲉⲓⲛ ⲁⲩⲱ ⲡⲁⲅⲅⲉⲗⲟⲥ ⲁⲩⲱ <text:line-break/><text:span text:style-name="T1"> </text:span><text:span text:style-name="T2">(106/28) </text:span> ⲡϣⲱⲥ ⲉⲧ’ⲛⲁⲛⲟⲩϥ· ⲧⲁⲁⲕ <text:line-break/><text:span text:style-name="T1"> </text:span><text:span text:style-name="T2">(106/29) </text:span> ⲛ̅ⲧⲟⲟⲧ̅ϥ̅ ⲙ̅ⲡⲁⲓ̈ ⲛ̅ⲧⲁϥϣⲱⲡⲉ <text:line-break/><text:span text:style-name="T1"> </text:span><text:span text:style-name="T2">(106/30) </text:span> ⲙ̅ⲡⲧⲏⲣ̅ϥ̅ ⲉⲧⲃⲏⲏⲧ̅ⲕ̅· ⲧⲱϩ̅ⲙ̅ <text:line-break/><text:span text:style-name="T1"> </text:span><text:span text:style-name="T2">(106/31) </text:span> ⲉϩⲟⲩⲛ ⲉⲣⲟⲕ ⲟⲩⲁⲁⲕ ⲛ̅ⲑⲉ ⲛ̅‐ <text:line-break/><text:span text:style-name="T1"> </text:span><text:span text:style-name="T2">(106/32) </text:span> ⲛⲓⲣⲟ· ⲁⲩⲱ ⲛ̅ⲅ̅ⲙⲟⲟϣⲉ ϩⲣⲁⲓ̈ <text:line-break/><text:span text:style-name="T1"> </text:span><text:span text:style-name="T2">(106/33) </text:span> ⲛ̅ϩⲏⲧ̅ⲕ̅ ϩⲱⲥ ϩ̅ⲓ̅ⲏ ⲉϥⲥⲟⲩⲧⲱⲛ· <text:line-break/><text:span text:style-name="T1"> </text:span><text:span text:style-name="T2">(106/34) </text:span> ⲉⲕϣⲁⲛⲙⲟⲟϣⲉ ⲅⲁⲣ ϩⲓ ⲧⲉϩ̅ⲓ̅‐ <text:line-break/><text:span text:style-name="T1"> </text:span><text:span text:style-name="T2">(106/35) </text:span> [ⲏ] ⲙ̣̅ⲙ̅ⲛ̅ϣϭⲟⲙ ⲛ̅ⲅ̅ⲣ̅ⲡⲗⲁⲛⲁ· <text:line-break/><text:span text:style-name="T1"> </text:span><text:span text:style-name="T2">(107/1) </text:span> ⲁⲩⲱ ⲉⲕϣⲁⲛⲧⲱϩ̅ⲙ̅ ϩ̅ⲛ̅ ⲧⲁⲓ̈ ⲉⲕ‐ <text:line-break/><text:span text:style-name="T1"> </text:span><text:span text:style-name="T2">(107/2) </text:span> ⲧⲱϩ̅ⲙ̅ ⲉϩⲟⲩⲛ ⲉϩⲉⲛⲉϩⲱⲣ ⲉⲩ‐ <text:line-break/><text:span text:style-name="T1"> </text:span><text:span text:style-name="T2">(107/3) </text:span> ϩⲏⲡ· ⲉϥϣⲟⲟⲡ ⲅⲁⲣ ⲛ̅ⲥⲟⲫⲓⲁ <text:line-break/><text:span text:style-name="T1"> </text:span><text:span text:style-name="T2">(107/4) </text:span> ϥⲉⲓⲣⲉ ⲙ̅ⲡⲁⲑⲏⲧ’ ⲛ̅ⲥⲟⲫⲟⲥ· <text:line-break/><text:span text:style-name="T1"> </text:span><text:span text:style-name="T2">(107/5) </text:span> ⲉⲥϣⲟⲟⲡ ⲛ̅ⲟⲩⲙ̅ⲛ̅ⲧⲉⲣⲟ ⲉⲥ‐ <text:line-break/><text:span text:style-name="T1"> </text:span><text:span text:style-name="T2">(107/6) </text:span> ⲟⲩⲁⲁⲃ· ⲁⲩⲱ ⲛ̅ⲥⲧⲟⲗⲏ ⲉⲥⲡ̅ⲣ̅ⲣⲓ‐ <text:line-break/><text:span text:style-name="T1"> </text:span><text:span text:style-name="T2">(107/7) </text:span> ⲱⲟⲩ· ⲟⲩϩⲁϩ ⲅⲁⲣ ⲛ̅ⲛⲟⲩⲃ ⲡⲉ <text:line-break/><text:span text:style-name="T1"> </text:span><text:span text:style-name="T2">(107/8) </text:span> ⲉϥϯ ⲛⲁⲕ ⲛ̅ⲟⲩⲛⲟϭ ⲛ̅ⲉⲟⲟⲩ· <text:line-break/><text:span text:style-name="T1"> </text:span><text:span text:style-name="T2">(107/9) </text:span> ⲧⲥⲟⲫⲓⲁ ⲙ̅ⲡⲛⲟⲩⲧⲉ ⲉⲧⲃⲏⲏⲧ̅ⲕ̅ <text:line-break/><text:span text:style-name="T1"> </text:span><text:span text:style-name="T2">(107/10) </text:span> ⲁⲥϣⲱⲡⲉ ⲛ̅ⲟⲩⲧⲩⲡⲟⲥ ⲛ̅ⲥⲉ‐ <text:line-break/><text:span text:style-name="T1"> </text:span><text:span text:style-name="T2">(107/11) </text:span> ϭⲉ ϫⲉⲕⲁⲁⲥ ⲛ̅ⲧⲟⲕ ⲡⲁⲑⲏⲧ ⲉ‐ <text:line-break/><text:span text:style-name="T1"> </text:span><text:span text:style-name="T2">(107/12) </text:span> ⲥⲉⲛⲁϫⲓⲧⲕ̅ ⲉϩⲣⲁⲓ̈ ⲛ̅ⲥ̅ⲁⲁⲕ ⲛ̅ⲣ̅ⲙ̅‐ <text:line-break/><text:span text:style-name="T1"> </text:span><text:span text:style-name="T2">(107/13) </text:span> ⲛ̅ϩⲏⲧ’· ⲁⲩⲱ ⲡⲱⲛ̅ϩ̅ ⲁϥⲙⲟⲩ <text:line-break/><text:span text:style-name="T1"> </text:span><text:span text:style-name="T2">(107/14) </text:span> ⲉⲧⲃⲏⲏⲧ̅ⲕ̅ ϩⲟⲡⲟⲧⲉ ⲟⲩⲁⲧϭⲟⲙ <text:line-break/><text:span text:style-name="T1"> </text:span><text:span text:style-name="T2">(107/15) </text:span> ⲡⲉ· ϫⲉⲕⲁⲁⲥ ϩ̅ⲓ̅ⲧ̅ⲙ̅ ⲡⲉϥⲙⲟⲩ <text:line-break/><text:span text:style-name="T1"> </text:span><text:span text:style-name="T2">(107/16) </text:span> ⲛ̅ⲧⲟⲕ ⲡⲉⲣ ⲙⲟⲩ ⲉϥⲛⲁϯ ⲛⲁⲕ <text:line-break/><text:span text:style-name="T1"> </text:span><text:span text:style-name="T2">(107/17) </text:span> ⲙ̅ⲡⲱⲛ̅ϩ̅· ⲧⲁⲁⲕ ⲛ̅ⲧⲟⲟⲧ̅ϥ̅ ⲙ̅‐ <text:line-break/><text:span text:style-name="T1"> </text:span><text:span text:style-name="T2">(107/18) </text:span> ⲡⲗⲟⲅⲟⲥ ⲛ̅ⲅ̅ⲥⲁϩⲱⲕ ⲉⲃⲟⲗ ⲛ̅ⲧ’̅‐ <text:line-break/><text:span text:style-name="T1"> </text:span><text:span text:style-name="T2">(107/19) </text:span> ⲙ̅ⲛ̅ⲧ̅’̅ⲧ̅ⲃ̅ⲛⲏ· ϥ̣ⲟⲩⲟⲛ̅ϩ̅ ⲅⲁⲣ ⲉ‐ <text:line-break/><text:span text:style-name="T1"> </text:span><text:span text:style-name="T2">(107/20) </text:span> ⲃⲟⲗ ⲛ̅ϭⲓ ⲡⲧ̅ⲃ̅ⲛⲏ ⲡⲁⲓ̈ ⲉⲧⲉ ⲙ̅ⲙ̅ⲛ̅‐ <text:line-break/><text:span text:style-name="T1"> </text:span><text:span text:style-name="T2">(107/21) </text:span> ⲧ̅ϥ̅ⲗⲟⲅⲟⲥ ⲙ̅ⲙⲁⲩ· ⲟⲩⲛ̅ ϩⲁϩ <text:line-break/><text:span text:style-name="T1"> </text:span><text:span text:style-name="T2">(107/22) </text:span> ⲅⲁⲣ ⲙⲉⲉⲩⲉ ϫⲉ ⲟⲩⲛ̅ⲧⲟⲩ <text:line-break/><text:span text:style-name="T1"> </text:span><text:span text:style-name="T2">(107/23) </text:span> ⲡⲗⲟⲅⲟⲥ ⲙ̅ⲙⲁⲩ· ⲁⲗⲗⲁ ⲉⲕ‐ <text:line-break/><text:span text:style-name="T1"> </text:span><text:span text:style-name="T2">(107/24) </text:span> ϣⲁⲛⲙⲟⲩϩ ⲛ̅ⲥⲱⲟⲩ ⲡⲟⲩ‐ <text:line-break/><text:span text:style-name="T1"> </text:span><text:span text:style-name="T2">(107/25) </text:span> ϣⲁϫⲉ ⲟⲩⲙ̅ⲛ̅ⲧ̅ⲧ̅ⲃ̅ⲛⲏ ⲡⲉ· <text:line-break/><text:span text:style-name="T1"> </text:span><text:span text:style-name="T2">(107/26) </text:span> ϯⲟⲩⲣⲟⲧ’ ⲛⲁⲕ ⲉⲃⲟⲗ ϩ̅ⲛ̅ ⲧⲃⲱ <text:line-break/><text:span text:style-name="T1"> </text:span><text:span text:style-name="T2">(107/27) </text:span> ⲛ̅ⲛⲉⲗⲟⲟⲗⲉ ⲙ̅ⲙⲉ ⲙ̅ⲡⲉⲭ̅ⲥ̅ <text:line-break/><text:span text:style-name="T1"> </text:span><text:span text:style-name="T2">(107/28) </text:span> ⲧⲥⲓⲟⲕ ⲉⲃⲟⲗ ϩ̅ⲙ̅ ⲡⲏⲣ̅ⲡ̅ ⲛ̅ⲁⲗⲏ‐ <text:line-break/><text:span text:style-name="T1"> </text:span><text:span text:style-name="T2">(107/29) </text:span> ⲑⲓⲛⲟⲛ· ⲡⲁⲓ̈ ⲉⲧⲉ ⲙ̅ⲙ̅ⲛ̅ϯϩⲉ <text:line-break/><text:span text:style-name="T1"> </text:span><text:span text:style-name="T2">(107/30) </text:span> ϣⲟⲟⲡ ϩⲣⲁⲓ̈ ⲛ̅ϩⲏⲧ̅ϥ̅ ⲟⲩⲇⲉ <text:line-break/><text:span text:style-name="T1"> </text:span><text:span text:style-name="T2">(107/31) </text:span> ⲙ̅ⲙ̅ⲛ̅ⲥⲟⲣ̅ⲙ̅· ⲟⲩⲛ̅ⲧⲁϥ ⲅⲁⲣ <text:line-break/><text:span text:style-name="T1"> </text:span><text:span text:style-name="T2">(107/32) </text:span> ⲙ̅ⲙⲁⲩ ⲛ̅ⲑⲁⲏ ⲙ̅ⲡⲥⲱ ⲉϣⲁϥ <text:line-break/><text:span text:style-name="T1"> </text:span><text:span text:style-name="T2">(107/33) </text:span> ϣⲱⲡⲉ ϩⲣⲁⲓ̈ ⲛ̅ϩⲏⲧϥ̅ ⲉϯ ⲟⲩ <text:line-break/><text:span text:style-name="T1"> </text:span><text:span text:style-name="T2">(107/34) </text:span> ⲣⲟⲧ’ ⲛ̅ϩⲏⲧ’ ⲛ̅ⲧⲯⲩⲭⲏ ⲙ̅ⲛ̅ <text:line-break/><text:span text:style-name="T1"> </text:span><text:span text:style-name="T2">(107/35) </text:span> ⲡⲛⲟⲩⲥ ϩ̅ⲙ̅ ⲡⲉⲡ̅ⲛⲁ̅ ⲙ̅ⲡ̣ⲛⲟⲩⲧⲉ <text:line-break/><text:soft-page-break/><text:span text:style-name="T1"> </text:span><text:span text:style-name="T2">(108/1) </text:span> ϣⲟⲣ̅ⲡ̅ ⲇⲉ ⲙⲟⲛⲉ ⲛ̅ⲛⲉⲕⲗⲟⲅⲓⲥ‐ <text:line-break/><text:span text:style-name="T1"> </text:span><text:span text:style-name="T2">(108/2) </text:span> ⲙⲟⲥ· ϩⲁⲧⲉϩⲏ ⲉⲙⲡⲁⲧ̅ⲕ̅ⲥⲱ ⲉ‐ <text:line-break/><text:span text:style-name="T1"> </text:span><text:span text:style-name="T2">(108/3) </text:span> ⲃⲟⲗ ⲛ̅ϩⲏⲧ̅ϥ̅· ⲙ̅ⲡ̅ⲣ̅ⲕⲟⲛⲥ̅ⲕ̅ ϩ̅ⲛ̅ <text:line-break/><text:span text:style-name="T1"> </text:span><text:span text:style-name="T2">(108/4) </text:span> ⲧⲥⲏϥⲉ ⲙ̅ⲡⲛⲟⲃⲉ· ⲙ̅ⲡ̅ⲣ̅ⲣⲟⲕϩ̅ⲕ̅ <text:line-break/><text:span text:style-name="T1"> </text:span><text:span text:style-name="T2">(108/5) </text:span> ⲱ͂ ⲡⲧⲁⲗⲁⲓⲡⲱⲣⲟⲥ ϩ̅ⲙ̅ ⲡⲕⲱϩ̅ⲧ’̅ <text:line-break/><text:span text:style-name="T1"> </text:span><text:span text:style-name="T2">(108/6) </text:span> ⲛ̅ⲑⲏⲇⲟⲛⲏ· ⲙ̅ⲡ̅ⲣ̅ⲧⲁⲁⲕ ⲛ̅ⲧⲟⲟ‐ <text:line-break/><text:span text:style-name="T1"> </text:span><text:span text:style-name="T2">(108/7) </text:span> ⲧⲟⲩ ⲛ̅ⲛⲓⲃⲁⲣⲃⲁⲣⲟⲥ ⲛ̅ⲑⲉ ⲛ̅ⲛⲓⲁⲓ‐ <text:line-break/><text:span text:style-name="T1"> </text:span><text:span text:style-name="T2">(108/8) </text:span> ⲭⲙⲁⲗⲱⲧⲟⲥ· ⲟⲩⲇⲉ ⲛ̅ⲧⲟⲟⲧⲟⲩ <text:line-break/><text:span text:style-name="T1"> </text:span><text:span text:style-name="T2">(108/9) </text:span> ⲛ̅ⲛⲓⲑⲏⲣⲓⲟⲛ ⲛ̅ⲁⲅⲣⲓⲟⲛ ⲉⲩⲟⲩ‐ <text:line-break/><text:span text:style-name="T1"> </text:span><text:span text:style-name="T2">(108/10) </text:span> ⲱϣ ⲉⲣ̅ⲕⲁⲧⲁⲡⲁⲧⲓ ⲙ̅ⲙⲟⲕ· ⲉⲩ‐ <text:line-break/><text:span text:style-name="T1"> </text:span><text:span text:style-name="T2">(108/11) </text:span> ϣⲟⲟⲡ ⲅⲁⲣ ⲛ̅ⲑⲉ ⲛ̅ⲛⲓⲙⲟⲩⲉⲓ <text:line-break/><text:span text:style-name="T1"> </text:span><text:span text:style-name="T2">(108/12) </text:span> ⲉⲧ’ϩ̅ⲙ̅ϩ̅ⲙ̅ ⲉⲙⲁⲧⲉ· ⲙⲡ̅ⲣ̅ϣⲱ‐ <text:line-break/><text:span text:style-name="T1"> </text:span><text:span text:style-name="T2">(108/13) </text:span> ⲡⲉ ⲉⲕⲙⲟⲟⲩⲧ’ ⲙⲏⲡⲟⲧⲉ ⲛ̅ⲥⲉ <text:line-break/><text:span text:style-name="T1"> </text:span><text:span text:style-name="T2">(108/14) </text:span> ⲣ̅ⲕⲁⲧⲁⲡⲁⲧⲓ ⲙ̅ⲙⲟⲕ· ⲉⲕⲉⲣ̅ ⲣⲱ‐ <text:line-break/><text:span text:style-name="T1"> </text:span><text:span text:style-name="T2">(108/15) </text:span> ⲙⲉ ⲟⲩⲛ̅ ϭⲟⲙ ⲙ̅ⲙⲟⲕ ϩ̅ⲙ̅ ⲡⲗⲟ‐ <text:line-break/><text:span text:style-name="T1"> </text:span><text:span text:style-name="T2">(108/16) </text:span> ⲅⲓⲥⲙⲟⲥ ⲛ̅ⲅ̅ϫⲣⲟ ⲉⲛⲁⲓ̈· ⲡⲣⲱⲙⲉ <text:line-break/><text:span text:style-name="T1"> </text:span><text:span text:style-name="T2">(108/17) </text:span> ⲇⲉ ⲉⲧ̅ⲣ̅ ⲗⲁⲁⲩ ⲁⲛ ⲉϥⲙ̅ⲡϣⲁ ⲙ̅ⲡⲗⲟ‐ <text:line-break/><text:span text:style-name="T1"> </text:span><text:span text:style-name="T2">(108/18) </text:span> ⲅⲓⲕⲟⲥ ⲛ̅ⲣⲱⲙⲉ ⲁⲛ· ⲡⲗⲟⲅⲓⲕⲟⲥ <text:line-break/><text:span text:style-name="T1"> </text:span><text:span text:style-name="T2">(108/19) </text:span> ⲛ̅ⲣⲱⲙⲉ ⲡⲉⲧⲣ̅ ϩⲟⲧⲉ ϩⲏⲧϥ̅ ⲙ̅ⲡ̅‐ <text:line-break/><text:span text:style-name="T1"> </text:span><text:span text:style-name="T2">(108/20) </text:span> ⲛⲟⲩⲧⲉ· ⲡⲉⲧⲣ̅ ϩⲟⲧⲉ ⲇⲉ ϩⲏⲧϥ̅ <text:line-break/><text:span text:style-name="T1"> </text:span><text:span text:style-name="T2">(108/21) </text:span> ⲙ̅ⲡⲛⲟⲩⲧⲉ ⲙⲁϥⲣ̅ ⲗⲁⲁⲩ ⲛ̅ⲧⲟⲗ <text:line-break/><text:span text:style-name="T1"> </text:span><text:span text:style-name="T2">(108/22) </text:span> ⲙⲏⲣⲓⲁ· ⲡⲉⲧ̅ⲣ̅ⲧⲏⲣⲓ ⲇⲉ ⲙ̅ⲙⲟϥ <text:line-break/><text:span text:style-name="T1"> </text:span><text:span text:style-name="T2">(108/23) </text:span> ⲉⲧ̅ⲙ̅ⲣ̅ ⲗⲁⲁⲩ ⲛ̅ⲧⲟⲗⲙⲏⲣⲓⲁ· ⲡⲁⲓ̈ <text:line-break/><text:span text:style-name="T1"> </text:span><text:span text:style-name="T2">(108/24) </text:span> ⲡⲉⲧⲁⲣⲉϩ ⲉⲡⲉϥϩⲏⲅⲉⲙⲟⲛⲓⲕⲟⲛ <text:line-break/><text:span text:style-name="T1"> </text:span><text:span text:style-name="T2">(108/25) </text:span> ⲛ̅ⲧⲟϥ ⲉⲩⲣⲱⲙⲉ ⲡⲉ ⲉϥϣⲟⲟⲡ <text:line-break/><text:span text:style-name="T1"> </text:span><text:span text:style-name="T2">(108/26) </text:span> ϩⲓ̅ϫ̅ⲙ̅ ⲡⲕⲁϩ ⲉϥⲧⲟⲛⲧ̅ⲛ̅ ⲙ̅ⲙⲟϥ <text:line-break/><text:span text:style-name="T1"> </text:span><text:span text:style-name="T2">(108/27) </text:span> ⲉⲡⲛⲟⲩⲧⲉ· ⲡⲉⲧ’ⲧⲟⲛⲧ̅ⲛ̅ <text:line-break/><text:span text:style-name="T1"> </text:span><text:span text:style-name="T2">(108/28) </text:span> ⲇⲉ ⲙ̅ⲙⲟϥ ⲉⲡⲛⲟⲩⲧⲉ ⲡⲉⲧⲣ̅‐ <text:line-break/><text:span text:style-name="T1"> </text:span><text:span text:style-name="T2">(108/29) </text:span> ⲗⲁⲁⲩ ⲁⲛ ⲉϥⲙ̅ⲡϣⲁ ⲙ̅ⲡⲛⲟⲩ‐ <text:line-break/><text:span text:style-name="T1"> </text:span><text:span text:style-name="T2">(108/30) </text:span> ⲧⲉ· ⲕⲁⲧⲁ ⲧⲉⲥⲙⲏ ⲙ̅ⲡⲁⲩⲗⲟⲥ <text:line-break/><text:span text:style-name="T1"> </text:span><text:span text:style-name="T2">(108/31) </text:span> ⲡⲁⲓ̈ ⲛ̅ⲧⲁϥϣⲱⲡⲉ ⲉϥⲧ̅ⲛ̅ⲧⲱⲛ <text:line-break/><text:span text:style-name="T1"> </text:span><text:span text:style-name="T2">(108/32) </text:span> ⲉⲡⲉⲭ̅ⲥ̅· ⲛⲓⲙ ⲅⲁⲣ ⲡⲉ ⲡⲉⲧ̅ⲣ̅ⲥⲉ‐ <text:line-break/><text:span text:style-name="T1"> </text:span><text:span text:style-name="T2">(108/33) </text:span> ⲃⲉⲥⲑⲁⲓ ⲉⲡⲛⲟⲩⲧⲉ· ⲉϥⲟⲩ‐ <text:line-break/><text:span text:style-name="T1"> </text:span><text:span text:style-name="T2">(108/34) </text:span> ⲱϣ ⲉⲓⲣⲉ ⲁⲛ ⲛ̅ⲛⲉⲧⲣ̅ ⲁⲛⲁϥ <text:line-break/><text:span text:style-name="T1"> </text:span><text:span text:style-name="T2">(108/35) </text:span> ⲙ̅ⲡⲛⲟⲩⲧⲉ· ⲧⲙ̅ⲛ̅ⲧⲣⲉϥϣ̅ⲙ̅ <text:line-break/><text:span text:style-name="T1"> </text:span><text:span text:style-name="T2">(108/36) </text:span> ϣⲉ ⲛⲟⲩⲧⲉ ⲅⲁⲣ ⲧⲉ ⲧⲉⲧ’ϣⲟ‐ <text:line-break/><text:span text:style-name="T1"> </text:span><text:span text:style-name="T2">(109/1) </text:span> ⲟⲡ ⲉⲃⲟⲗ ϩ̅ⲙ̅ ⲫⲏⲧ’· ⲧⲙ̅ⲛⲧⲣⲉϥ <text:line-break/><text:span text:style-name="T1"> </text:span><text:span text:style-name="T2">(109/2) </text:span> ϣ̅ⲙ̅ϣⲉ ⲛⲟⲩⲧⲉ ⲇⲉ ⲉⲃⲟⲗ ϩ̅ⲙ̅ <text:line-break/><text:span text:style-name="T1"> </text:span><text:span text:style-name="T2">(109/3) </text:span> ⲫⲏⲧ’ ⲧⲉ ⲯⲩⲭⲏ ⲛⲓⲙ ⲉⲧ’ϩⲏⲛ <text:line-break/><text:span text:style-name="T1"> </text:span><text:span text:style-name="T2">(109/4) </text:span> ⲉⲡⲛⲟⲩⲧⲉ· ⲧⲯⲭⲏ ⲇⲉ ⲉⲧⲟ <text:line-break/><text:span text:style-name="T1"> </text:span><text:span text:style-name="T2">(109/5) </text:span> ⲛ̅ⲣ̅ⲙ̅ϩ̅ⲛ̅ⲏ{ⲉⲓ} ⲉⲡⲛⲟⲩⲧⲉ ⲧⲉⲧⲟⲩ <text:line-break/><text:span text:style-name="T1"> </text:span><text:span text:style-name="T2">(109/6) </text:span> ϩⲁⲣⲉϩ ⲉⲣⲟⲥ ⲉⲥⲟⲩⲁⲁⲃ· ⲧⲯⲩ‐ <text:line-break/><text:span text:style-name="T1"> </text:span><text:span text:style-name="T2">(109/7) </text:span> ⲭⲏ ⲇⲉ ⲉⲧⲉⲣⲉⲡⲉⲭ̅ⲥ̅ ⲧⲟ {ϩⲓ}ⲱⲱⲥ <text:line-break/><text:span text:style-name="T1"> </text:span><text:span text:style-name="T2">(109/8) </text:span> ⲛ̅ⲧⲟⲥ ⲧⲉ ⲧⲉⲧⲟⲩⲁⲁⲃ· ⲁⲩⲱ ⲙ̅‐ <text:line-break/><text:span text:style-name="T1"> </text:span><text:span text:style-name="T2">(109/9) </text:span> ⲙ̅ⲛ̅ ϣϭⲟⲙ ⲉⲧⲣⲉⲥⲣ̅ ⲛⲟⲃⲉ· ⲡⲙⲁ <text:line-break/><text:span text:style-name="T1"> </text:span><text:span text:style-name="T2">(109/10) </text:span> ⲇⲉ ⲉⲧⲉⲣⲉⲡⲉⲭ̅ⲥ̅ ⲙ̅ⲙⲁⲩ ϣⲁⲣⲉ <text:line-break/><text:span text:style-name="T1"> </text:span><text:span text:style-name="T2">(109/11) </text:span> ⲡⲛⲟⲃⲉ ⲟⲩⲱⲥϥ̅· ⲙⲁⲣⲉⲡⲉⲭ̅ⲥ̅ <text:line-break/><text:soft-page-break/><text:span text:style-name="T1"> </text:span><text:span text:style-name="T2">(109/12) </text:span> ⲉⲓ ⲉϩⲟⲩⲛ ⲉⲡⲉⲕⲕⲟⲥⲙⲟⲥ <text:line-break/><text:span text:style-name="T1"> </text:span><text:span text:style-name="T2">(109/13) </text:span> ⲟⲩⲁⲁϥ· ⲁⲩⲱ ⲙⲁⲣⲉϥⲟⲩⲱⲥϥ̅ <text:line-break/><text:span text:style-name="T1"> </text:span><text:span text:style-name="T2">(109/14) </text:span> ⲛ̅ⲇⲩⲛⲁⲙⲓⲥ ⲛⲓⲙ ⲉⲁⲩ{ⲉ̅ⲓ} ⲉϫⲱⲕ· <text:line-break/><text:span text:style-name="T1"> </text:span><text:span text:style-name="T2">(109/15) </text:span> ⲙⲁⲣⲉϥ{ⲉ̅ⲓ} ⲉϩⲟⲩⲛ ⲉⲡⲣ̅ⲡⲉ ⲉⲧⲛ̅ <text:line-break/><text:span text:style-name="T1"> </text:span><text:span text:style-name="T2">(109/16) </text:span> ϩⲏⲧ̅ⲕ̅· ϫⲉⲕⲁⲁⲥ ⲉϥⲉⲛⲟⲩϫⲉ <text:line-break/><text:span text:style-name="T1"> </text:span><text:span text:style-name="T2">(109/17) </text:span> ⲉⲃⲟⲗ ⲛ̅ⲛⲉϣⲱⲧ’ ⲛⲓⲙ· ⲙⲁⲣⲉϥ <text:line-break/><text:span text:style-name="T1"> </text:span><text:span text:style-name="T2">(109/18) </text:span> ϩⲙⲟⲟⲥ ϩ̅ⲙ̅ ⲡⲉⲣⲡⲉ ⲉⲧ’ϣⲟⲟⲡ <text:line-break/><text:span text:style-name="T1"> </text:span><text:span text:style-name="T2">(109/19) </text:span> ϩⲣⲁⲓ̈ ⲛ̅ϩⲏⲧ̅ⲕ̅ ⲁⲩⲱ ⲛ̅ⲅ̅ϣⲱⲡⲉ· <text:line-break/><text:span text:style-name="T1"> </text:span><text:span text:style-name="T2">(109/20) </text:span> ⲛⲁϥ ⲛ̅ⲟⲩⲏⲏⲃ ⲙ̅ⲛ̅ ⲟⲩⲗⲉⲩⲉⲓ <text:line-break/><text:span text:style-name="T1"> </text:span><text:span text:style-name="T2">(109/21) </text:span> ⲧⲏⲥ ⲉⲕⲃⲏⲕ ⲉϩⲟⲩⲛ ϩ̅ⲛ̅ ⲟⲩⲧⲃ̅‐ <text:line-break/><text:span text:style-name="T1"> </text:span><text:span text:style-name="T2">(109/22) </text:span> ⲃⲟ· ⲛⲁⲓ̈ⲁⲧⲉ ⲧⲯⲩⲭⲏ ⲉⲣⲉϣⲁⲛ <text:line-break/><text:span text:style-name="T1"> </text:span><text:span text:style-name="T2">(109/23) </text:span> ϭ̅ⲙ̅ ⲡⲁⲓ̈ ϩ̅ⲙ̅ ⲡⲉⲣ̅ⲡⲉ· ⲛⲁⲓ̈ⲁⲧⲉ <text:line-break/><text:span text:style-name="T1"> </text:span><text:span text:style-name="T2">(109/24) </text:span> ⲇⲉ ⲛ̅ϩⲟⲩⲟ͂ ⲉⲣⲉϣⲁⲉⲓⲣⲉ ⲙ̅ⲡⲉϥ‐ <text:line-break/><text:span text:style-name="T1"> </text:span><text:span text:style-name="T2">(109/25) </text:span> ϣ̅ⲙ̅ϣⲉ· ⲡⲉⲧⲛⲁⲥⲱⲱϥ ⲇⲉ <text:line-break/><text:span text:style-name="T1"> </text:span><text:span text:style-name="T2">(109/26) </text:span> ⲙ̅ⲡⲉⲣⲡⲉ ⲙ̅ⲡⲛⲟⲩⲧⲉ ⲡⲁⲓ̈ ⲡⲛⲟⲩ‐ <text:line-break/><text:span text:style-name="T1"> </text:span><text:span text:style-name="T2">(109/27) </text:span> ⲧⲉ ⲛⲁⲧⲁⲕⲟϥ· ⲕⲟⲩⲟⲛ̅ϩ̅ ⲅⲁⲣ <text:line-break/><text:span text:style-name="T1"> </text:span><text:span text:style-name="T2">(109/28) </text:span> ⲉⲃⲟⲗ ⲱ͂ ⲡⲣⲱⲙⲉ ⲉⲕϣⲁⲛ <text:line-break/><text:span text:style-name="T1"> </text:span><text:span text:style-name="T2">(109/29) </text:span> ⲛⲟⲩϫⲉ ⲙ̅ⲡⲁⲓ̈ ⲉⲃⲟⲗ ϩ̅ⲙ̅ ⲡⲉⲕ‐ <text:line-break/><text:span text:style-name="T1"> </text:span><text:span text:style-name="T2">(109/30) </text:span> ⲣ̅ⲡⲉ· ϩⲟⲧⲁⲛ ⲅⲁⲣ ⲉⲣϣⲁⲛⲧ̅ⲙ̅ <text:line-break/><text:span text:style-name="T1"> </text:span><text:span text:style-name="T2">(109/31) </text:span> ⲛ̅ϫⲁϫⲉ ⲛⲁⲩ ⲉⲡⲉⲭ̅ⲥ̅ ϩⲣⲁⲓ̈ ⲛ̅‐ <text:line-break/><text:span text:style-name="T1"> </text:span><text:span text:style-name="T2">(109/32) </text:span> ϩⲏⲧ̅ⲕ̅· ⲧⲟⲧⲉ ⲥⲉⲛ̅ⲛⲏⲩ ⲉϩⲟⲩⲛ <text:line-break/><text:span text:style-name="T1"> </text:span><text:span text:style-name="T2">(109/33) </text:span> ⲉⲣⲟⲕ ⲉⲩϩⲏⲕ ⲉⲧⲣⲉⲩⲧ̅ⲛ̅ⲛⲟ <text:line-break/><text:span text:style-name="T1"> </text:span><text:span text:style-name="T2">(109/34) </text:span> ⲙ̅ⲙⲟⲕ· ⲱ͂ ⲡⲁϣⲏⲣⲉ ⲁⲓ̈ϩⲱⲛ <text:line-break/><text:span text:style-name="T1"> </text:span><text:span text:style-name="T2">(109/35) </text:span> ⲉⲧⲟⲟⲧ̅ⲕ̅ ⲉⲧⲃⲉ ⲛⲁⲓ̈ ⲛ̅ϩⲁϩ ⲛ̅ⲥⲟⲡ· <text:line-break/><text:span text:style-name="T1"> </text:span><text:span text:style-name="T2">(110/1) </text:span> ϫⲉⲕⲁⲁⲥ ⲉⲕⲛⲁϩⲁⲣⲉϩ ⲉⲧⲉⲕ‐ <text:line-break/><text:span text:style-name="T1"> </text:span><text:span text:style-name="T2">(110/2) </text:span> ⲯⲩⲭⲏ ⲛ̅ⲛⲁⲩ ⲛⲓⲙ· ⲛ̅ⲧⲟⲕ ⲁⲛ ⲡⲉ‐ <text:line-break/><text:span text:style-name="T1"> </text:span><text:span text:style-name="T2">(110/3) </text:span> ⲧⲛⲁⲛⲟϫ̅ϥ̅ ⲉⲃⲟⲗ ⲙ̅ⲙⲟⲕ· ⲁⲗⲗⲁ ⲛ̅‐ <text:line-break/><text:span text:style-name="T1"> </text:span><text:span text:style-name="T2">(110/4) </text:span> ⲧⲟϥ ⲡⲉⲧⲛⲁⲛⲟϫ̅ⲕ̅· ⲛ̅ⲧⲟⲕ ⲅⲁⲣ <text:line-break/><text:span text:style-name="T1"> </text:span><text:span text:style-name="T2">(110/5) </text:span> ⲉⲕϣⲁⲛⲡⲱⲧ’ ⲉⲃⲟⲗ ⲙ̅ⲙⲟϥ ⲕⲛⲁ‐ <text:line-break/><text:span text:style-name="T1"> </text:span><text:span text:style-name="T2">(110/6) </text:span> ϩⲉ ⲉϩⲣⲁⲓ̈ ⲉⲩⲛⲟϭ ⲛ̅ⲛⲟⲃⲉ· ⲛ̅ⲧⲟⲕ <text:line-break/><text:span text:style-name="T1"> </text:span><text:span text:style-name="T2">(110/7) </text:span> ⲟⲛ ⲉⲕϣⲁⲛⲡⲱⲧ’ ⲛ̅ⲧⲟⲟⲧϥ̅ ⲕⲛⲁ‐ <text:line-break/><text:span text:style-name="T1"> </text:span><text:span text:style-name="T2">(110/8) </text:span> ϣⲱⲡⲉ ⲛ̅ϩⲣⲉ ⲛ̅ⲛⲉⲕϫⲁϫⲉ· ϫⲟ‐ <text:line-break/><text:span text:style-name="T1"> </text:span><text:span text:style-name="T2">(110/9) </text:span> ⲟⲩⲧ’ ⲅⲁⲣ ⲛⲓⲙ ϣⲁⲩⲡⲱⲧ’ ⲛ̅ⲧ̅ⲙ̅‐ <text:line-break/><text:span text:style-name="T1"> </text:span><text:span text:style-name="T2">(110/10) </text:span> ⲡⲟⲩϫⲟⲉⲓⲥ· ⲡϫⲟⲟⲩⲧ’ ⲇⲉ ϩ̅ⲛ̅ ⲧⲁ‐ <text:line-break/><text:span text:style-name="T1"> </text:span><text:span text:style-name="T2">(110/11) </text:span> ⲣⲉⲧⲏ ⲙ̅ⲛ̅ ⲧⲥⲟⲫⲓⲁ ϣⲁϥⲡⲱⲧ’ ⲛ̅‐ <text:line-break/><text:span text:style-name="T1"> </text:span><text:span text:style-name="T2">(110/12) </text:span> ⲧ̅ⲙ̅ ⲡⲉⲭ̅ⲥ̅· ⲣⲱⲙⲉ ⲅⲁⲣ ⲛⲓⲙ ⲉϣⲁϥ <text:line-break/><text:span text:style-name="T1"> </text:span><text:span text:style-name="T2">(110/13) </text:span> ⲟⲩⲱⲱⲧ’ ϣⲁϥϩⲉ ⲉϩⲣⲁⲓ̈ ⲉⲛϭⲓϫ <text:line-break/><text:span text:style-name="T1"> </text:span><text:span text:style-name="T2">(110/14) </text:span> ⲛ̅ⲛⲉⲑⲏⲣⲓⲟⲛ· ⲛⲓⲙ ⲡⲉ ⲡⲉⲭ̅ⲥ̅ ⲥⲟⲩ‐ <text:line-break/><text:span text:style-name="T1"> </text:span><text:span text:style-name="T2">(110/15) </text:span> ⲱⲛ̅ϥ̅ ⲁⲩⲱ ⲛ̅ⲅ̅ϫⲡⲟϥ ⲛⲁⲕ ⲛ̅ϣⲃⲏⲣ· <text:line-break/><text:span text:style-name="T1"> </text:span><text:span text:style-name="T2">(110/16) </text:span> ⲡⲁⲓ̈ ⲅⲁⲣ ⲡⲉ ⲡⲉϣⲃⲏⲣ ⲉⲧ̅ⲛ̅ϩⲟⲧ’· <text:line-break/><text:span text:style-name="T1"> </text:span><text:span text:style-name="T2">(110/17) </text:span> ⲛ̅ⲧⲟϥ ⲟⲛ ⲡⲉ ⲡⲛⲟⲩⲧⲉ ⲁⲩⲱ <text:line-break/><text:span text:style-name="T1"> </text:span><text:span text:style-name="T2">(110/18) </text:span> ⲡⲥⲁϩ· ⲡⲁⲓ̈ ⲉⲩⲛⲟⲩⲧⲉ ⲡⲉ ⲁϥϣⲱ‐ <text:line-break/><text:span text:style-name="T1"> </text:span><text:span text:style-name="T2">(110/19) </text:span> ⲡⲉ ⲛ̅ⲣⲱⲙⲉ ⲉⲧⲃⲏⲏⲧ̅ⲕ̅· ⲡⲁⲓ̈ ⲡⲉ ⲛ̅‐ <text:line-break/><text:span text:style-name="T1"> </text:span><text:span text:style-name="T2">(110/20) </text:span> ⲧⲁϥⲃⲱⲗ ⲉⲃⲟⲗ ⲛ̅ⲛ̅ⲙ̅ⲙⲟⲭⲗⲟⲥ ⲛ̅‐ <text:line-break/><text:span text:style-name="T1"> </text:span><text:span text:style-name="T2">(110/21) </text:span> ⲃⲁⲛⲓⲡⲉ ⲛ̅ⲁⲙ̅ⲛ̅ⲧⲉ ⲁⲩⲱ ⲛ̅ⲕ̅ⲗ̅ ⲛ̅‐ <text:line-break/><text:span text:style-name="T1"> </text:span><text:span text:style-name="T2">(110/22) </text:span> ϩⲟⲙⲉⲧ’· ⲡⲁⲓ̈ ⲡⲉ ⲛ̅ⲧⲁϥϩ̅ⲓ̅ ⲧⲟⲟ‐ <text:line-break/><text:span text:style-name="T1"> </text:span><text:span text:style-name="T2">(110/23) </text:span> ⲧ̅ϥ̅ ⲁϥⲧⲁⲩⲟ ⲉⲡⲉⲥⲏⲧ’ ⲛ̅ⲧⲩⲣⲁⲛ‐ <text:line-break/><text:soft-page-break/><text:span text:style-name="T1"> </text:span><text:span text:style-name="T2">(110/24) </text:span> ⲛⲟⲥ ⲛⲓⲙ ⲉⲧ’ϫⲟⲥⲉ ⲛ̅ϩⲏⲧ’· ⲡⲉⲛ‐ <text:line-break/><text:span text:style-name="T1"> </text:span><text:span text:style-name="T2">(110/25) </text:span> ⲧⲁϥⲃⲱⲗ ⲉⲃⲟⲗ ⲛ̅ⲧⲟⲟⲧϥ̅· ⲛ̅ⲙ̅ⲙ̅ⲣ̅‐ <text:line-break/><text:span text:style-name="T1"> </text:span><text:span text:style-name="T2">(110/26) </text:span> ⲣⲉ ⲉⲛⲉϥⲁⲙⲁϩⲧⲉ ⲙ̅ⲙⲟⲟⲩ· <text:line-break/><text:span text:style-name="T1"> </text:span><text:span text:style-name="T2">(110/27) </text:span> ⲁϥⲉⲓⲛⲉ ⲉϩⲣⲁⲓ̈ ⲛ̅ⲛ̅ϩⲏⲕⲉ ϩ̅ⲙ̅ ⲡ‐ <text:line-break/><text:span text:style-name="T1"> </text:span><text:span text:style-name="T2">(110/28) </text:span> ⲛⲟⲩⲛ ⲁⲩⲱ ⲛⲉⲧ’ⲙⲟⲕ̅ϩ̅ ⲛ̅ϩⲏⲧ’ <text:line-break/><text:span text:style-name="T1"> </text:span><text:span text:style-name="T2">(110/29) </text:span> ϩ̅ⲛ̅ ⲉⲙ̅ⲛ̅ⲧⲉ· ⲡⲉⲛⲧⲁϥⲑ̅ⲃ̅ⲃⲓⲟ <text:line-break/><text:span text:style-name="T1"> </text:span><text:span text:style-name="T2">(110/30) </text:span> ⲛ̅ⲛ̅ⲇⲩⲛⲁⲙⲓⲥ ⲉⲧ’ϫⲟⲥⲉ ⲛ̅ϩⲏⲧ’· <text:line-break/><text:span text:style-name="T1"> </text:span><text:span text:style-name="T2">(110/31) </text:span> ⲡⲉⲛⲧⲁϥϯ ϣⲓⲡⲉ ⲙ̅ⲡϫⲁⲥⲓϩⲏⲧ’ <text:line-break/><text:span text:style-name="T1"> </text:span><text:span text:style-name="T2">(110/32) </text:span> ϩ̅ⲓ̅ⲧ̅ⲛ̅ ⲡⲑ̅ⲃ̅ⲃⲓⲟ· ⲡⲉⲛⲧⲁϥⲧⲁⲩⲟ <text:line-break/><text:span text:style-name="T1"> </text:span><text:span text:style-name="T2">(110/33) </text:span> ⲉⲡⲉⲥⲏⲧ’ ⲙ̅ⲡϫⲱⲱⲣⲉ· ⲁⲩⲱ <text:line-break/><text:span text:style-name="T1"> </text:span><text:span text:style-name="T2">(110/34) </text:span> ⲡⲣⲉϥⲃⲁⲃⲉ ⲣⲱⲙⲉ ϩ̅ⲓ̅ⲧ̅ⲛ̅ ⲧⲙ̅ⲛⲧ’̅‐ <text:line-break/><text:span text:style-name="T1"> </text:span><text:span text:style-name="T2">(110/35) </text:span> ϭⲱⲃ· ⲡⲉⲛⲧⲁϥϣⲱⲥ ⲙ̅ⲡⲉⲧⲟⲩ‐ <text:line-break/><text:span text:style-name="T1"> </text:span><text:span text:style-name="T2">(111/1) </text:span> ⲙⲉⲉⲩⲉ ⲉⲣⲟϥ ϫⲉ ⲟⲩⲧⲁⲉⲓⲟ ⲡⲉ· <text:line-break/><text:span text:style-name="T1"> </text:span><text:span text:style-name="T2">(111/2) </text:span> ϩⲣⲁⲓ̈ ϩ̅ⲙ̅ ⲡⲉϥϣⲱⲥ· ϫⲉⲕⲁⲁⲥ ⲉⲣⲉ <text:line-break/><text:span text:style-name="T1"> </text:span><text:span text:style-name="T2">(111/3) </text:span> ⲡⲑ̅ⲃ̅ⲃⲓⲟ ⲉⲧⲃⲉ ⲡⲛⲟⲩⲧⲉ ⲛⲁϫⲓ‐ <text:line-break/><text:span text:style-name="T1"> </text:span><text:span text:style-name="T2">(111/4) </text:span> ⲥⲉ ⲉⲙⲁⲧⲉ ⲡⲉⲛⲧⲁϥϭⲱⲗⲉ ⲙ̅ⲡⲣⲱ‐ <text:line-break/><text:span text:style-name="T1"> </text:span><text:span text:style-name="T2">(111/5) </text:span> ⲙⲉ· ⲁⲩⲱ ⲡⲛⲟⲩⲧⲉ ⲡⲉ ⲡⲑⲉⲓⲟⲥ ⲗⲟ‐ <text:line-break/><text:span text:style-name="T1"> </text:span><text:span text:style-name="T2">(111/6) </text:span> ⲅⲟⲥ· ⲡⲉⲧ’ϥⲓ ⲉϩⲣⲁⲓ̈ ϩⲁ ⲡⲣⲱⲙⲉ ⲛ̅ⲟⲩ‐ <text:line-break/><text:span text:style-name="T1"> </text:span><text:span text:style-name="T2">(111/7) </text:span> ⲟⲉⲓϣ ⲛⲓⲙ· ⲁⲩⲱ ⲁϥⲟⲩⲱϣ ⲁⲉⲓⲣⲉ <text:line-break/><text:span text:style-name="T1"> </text:span><text:span text:style-name="T2">(111/8) </text:span> ⲙ̅ⲡⲑ̅ⲃ̅ⲃⲓⲟ ϩ̅ⲙ̅ ⲡⲉⲧϫⲟⲥⲉ· ⲡⲉⲛⲧⲁϥ‐ <text:line-break/><text:span text:style-name="T1"> </text:span><text:span text:style-name="T2">(111/9) </text:span> ϫⲓⲥⲉ ⲙ̅ⲡⲣⲱⲙⲉ ⲁϥϣⲱⲡⲉ ⲉϥⲧ̅ⲛ̅‐ <text:line-break/><text:span text:style-name="T1"> </text:span><text:span text:style-name="T2">(111/10) </text:span> ⲧⲱⲛ ⲉⲡⲛⲟⲩⲧⲉ· ϫⲉⲕⲁⲁⲥ ⲁⲛ ⲉϥ‐ <text:line-break/><text:span text:style-name="T1"> </text:span><text:span text:style-name="T2">(111/11) </text:span> ⲛⲁⲉⲓⲛⲉ ⲉⲡⲉⲥⲏⲧ’ ⲙ̅ⲡⲛⲟⲩⲧⲉ ϣⲁ‐ <text:line-break/><text:span text:style-name="T1"> </text:span><text:span text:style-name="T2">(111/12) </text:span> ⲡⲣⲱⲙⲉ· ⲁⲗⲗⲁ ⲉⲧⲣⲉⲡⲣⲱⲙⲉ ϣⲱ‐ <text:line-break/><text:span text:style-name="T1"> </text:span><text:span text:style-name="T2">(111/13) </text:span> ⲡⲉ ⲉϥⲧ̅ⲛ̅ⲧⲱⲛ ⲉⲡⲛⲟⲩⲧⲉ ⲱ͂ ϯ <text:line-break/><text:span text:style-name="T1"> </text:span><text:span text:style-name="T2">(111/14) </text:span> ⲛⲟϭ ⲙ̅ⲙ̅ⲛ̅ⲧ̅’̅ⲭ̅ⲥ̅ ⲛ̅ⲧⲉ ⲡⲛⲟⲩⲧⲉ· <text:line-break/><text:span text:style-name="T1"> </text:span><text:span text:style-name="T2">(111/15) </text:span> ⲱ͂ ⲡⲉⲭ̅ⲥ̅ ⲡⲣ̅ⲣⲟ ⲡⲉⲛⲧⲁϥⲟⲩⲱⲛ̅ϩ̅ <text:line-break/><text:span text:style-name="T1"> </text:span><text:span text:style-name="T2">(111/16) </text:span> ⲉⲃⲟⲗ ⲛ̅ⲛ̅ⲣⲱⲙⲉ ⲛ̅ⲧⲛⲟϭ ⲙ̅ⲙ̅ⲛ̅ⲧ̅’̅‐ <text:line-break/><text:span text:style-name="T1"> </text:span><text:span text:style-name="T2">(111/17) </text:span> ⲛⲟⲩⲧⲉ· ⲡ̅ⲣ̅ⲣⲟ ⲛ̅ⲁⲣⲉⲧⲏ ⲛⲓⲙ· ⲁⲩⲱ <text:line-break/><text:span text:style-name="T1"> </text:span><text:span text:style-name="T2">(111/18) </text:span> ⲡ̅ⲣ̅ⲣⲟ ⲙ̅ⲡⲱⲛ̅ϩ̅· ⲡ̅ⲣ̅ⲣⲟ ⲛ̅ⲛⲉⲱⲛ ⲁⲩⲱ <text:line-break/><text:span text:style-name="T1"> </text:span><text:span text:style-name="T2">(111/19) </text:span> ⲡⲛⲟϭ ⲛ̅ⲛ̅ⲙ̅ⲡⲏⲩⲉ· ⲥⲱⲧ̅ⲙ̅ ⲉⲛⲁϣⲁ‐ <text:line-break/><text:span text:style-name="T1"> </text:span><text:span text:style-name="T2">(111/20) </text:span> ϫⲉ ⲁⲩⲱ ⲛ̅ⲅ̅ⲕⲱ ⲉⲃⲟⲗ ⲛⲁⲓ̈· ⲡⲁⲗⲓⲛ <text:line-break/><text:span text:style-name="T1"> </text:span><text:span text:style-name="T2">(111/21) </text:span> ⲁϥⲟⲩⲱⲛ̅ϩ̅ ⲉⲃⲟⲗ ⲛ̅ⲟⲩⲛⲟϭ ⲛ̅ⲥⲡⲟⲩ‐ <text:line-break/><text:span text:style-name="T1"> </text:span><text:span text:style-name="T2">(111/22) </text:span> ⲇⲏ ⲙ̅ⲙ̅ⲛ̅ⲧ̅’̅ⲛⲟⲩⲧⲉ· ⲉϥⲧⲱⲛ ⲥⲟ‐ <text:line-break/><text:span text:style-name="T1"> </text:span><text:span text:style-name="T2">(111/23) </text:span> ⲫⲟⲥ ⲏ ⲇⲩⲛⲁⲧⲟⲥ ⲛ̅ⲣ̅ⲙ̅ⲛ̅ϩⲏⲧ’ ⲛ̅‐ <text:line-break/><text:span text:style-name="T1"> </text:span><text:span text:style-name="T2">(111/24) </text:span> ⲣⲱⲙⲉ· ⲏ ⲟⲩⲣⲱⲙⲉ ⲉⲛⲁϣⲉ ⲛⲉϥ‐ <text:line-break/><text:span text:style-name="T1"> </text:span><text:span text:style-name="T2">(111/25) </text:span> ⲕⲟⲧ̅ⲥ̅ ⲉϥⲥⲟⲟⲩⲛ ⲛ̅ⲧⲥⲟⲫⲓⲁ· <text:line-break/><text:span text:style-name="T1"> </text:span><text:span text:style-name="T2">(111/26) </text:span> ⲙⲁⲣⲉϥϫⲱ ⲛ̅ⲧⲥⲟⲫⲓⲁ ⲙⲁⲣⲉϥⲧⲁⲩⲟ <text:line-break/><text:span text:style-name="T1"> </text:span><text:span text:style-name="T2">(111/27) </text:span> ⲛ̅ⲟⲩⲛⲟϭ ⲛ̅ϣⲟⲩϣⲟⲩ· ⲁⲣⲱⲙⲉ <text:line-break/><text:span text:style-name="T1"> </text:span><text:span text:style-name="T2">(111/28) </text:span> ⲅⲁⲣ ⲛⲓⲙ ⲣ̅ ⲥⲟϭ ⲡⲉϫⲁϥ ⲉⲃⲟⲗ ϩ̅ⲙ̅ <text:line-break/><text:span text:style-name="T1"> </text:span><text:span text:style-name="T2">(111/29) </text:span> ⲡⲉϥⲥⲟⲟⲩⲛ· ⲁϥⲡⲱϣⲥ ⲅⲁⲣ ⲛ̅ⲛ̅‐ <text:line-break/><text:span text:style-name="T1"> </text:span><text:span text:style-name="T2">(111/30) </text:span> ϣⲟϫⲛⲉ ⲛ̅ⲛⲓⲥⲁ ⲛⲕⲟⲧ̅ⲥ̅· ⲁⲩⲱ <text:line-break/><text:span text:style-name="T1"> </text:span><text:span text:style-name="T2">(111/31) </text:span> ⲁϥⲧⲁϩⲟ ⲛ̅ⲛ̅ⲥⲁⲃⲉ ϩ̅ⲛ̅ ⲧⲉⲩⲙ̅ⲛ̅‐ <text:line-break/><text:span text:style-name="T1"> </text:span><text:span text:style-name="T2">(111/32) </text:span> ⲧⲣ̅ⲙ̅ⲛ̅ϩⲏⲧ· ⲛⲓⲙ ⲡⲉⲧⲛⲁϣϭ̅ⲙ̅ <text:line-break/><text:span text:style-name="T1"> </text:span><text:span text:style-name="T2">(111/33) </text:span> ϭⲟⲙ ⲛ̅ϭⲓⲛⲉ ⲙ̅ⲡϣⲟϫⲛⲉ ⲙ̅ⲡ̅ <text:line-break/><text:span text:style-name="T1"> </text:span><text:span text:style-name="T2">(111/34) </text:span> ⲡⲁⲛⲧⲟⲕⲣⲁⲧⲱⲣ· ⲏ%0 ⲉϫⲱ ⲛ̅ⲧⲙ̅ⲛ̅‐ <text:line-break/><text:span text:style-name="T1"> </text:span><text:span text:style-name="T2">(111/35) </text:span> ⲧⲛⲟⲩⲧⲉ ⲏ%0 ⲉⲧⲁⲩⲟⲥ ⲕⲁⲗⲱⲥ· <text:line-break/><text:soft-page-break/><text:span text:style-name="T1"> </text:span><text:span text:style-name="T2">(112/1) </text:span> ⲉϣϫⲉ ⲙ̅ⲡⲉⲛϣϭ̅ⲙ̅ϭⲁⲙ ⲣⲱ ⲉ‐ <text:line-break/><text:span text:style-name="T1"> </text:span><text:span text:style-name="T2">(112/2) </text:span> ⲧⲁϩⲉ ⲛ̅ϣⲟϫⲛⲉ ⲛ̅ⲛⲉⲛⲉⲣⲏⲩ· <text:line-break/><text:span text:style-name="T1"> </text:span><text:span text:style-name="T2">(112/3) </text:span> ⲛⲓⲙ ⲡⲉ ⲉⲧⲛⲁϣⲙ̅ⲙⲉ ⲉⲧⲙ̅ⲛ̅ⲧ̅’̅‐ <text:line-break/><text:span text:style-name="T1"> </text:span><text:span text:style-name="T2">(112/4) </text:span> ⲛⲟⲩⲧⲉ· ⲏ ⲁⲛⲙ̅ⲛ̅ⲧ̅’̅ⲛⲟⲩⲧⲉ ⲛ̅‐ <text:line-break/><text:span text:style-name="T1"> </text:span><text:span text:style-name="T2">(112/5) </text:span> ⲛ̅ⲙ̅ⲡⲏⲩⲉ· ⲉϣϫⲉ ⲛⲉⲧ’ϩ̅ⲓ̅ϫ̅ⲙ̅ <text:line-break/><text:span text:style-name="T1"> </text:span><text:span text:style-name="T2">(112/6) </text:span> ⲡⲕⲁϩ ⲙⲟⲅⲓⲥ ⲉⲛϭⲓⲛⲉ ⲙ̅ⲙⲟⲟⲩ <text:line-break/><text:span text:style-name="T1"> </text:span><text:span text:style-name="T2">(112/7) </text:span> ⲛⲓⲙ ⲡⲉ ⲉⲧⲛⲁϩⲟⲧ’̣ϩ̅ⲧ̅’̅ ⲛ̅ⲥⲁ ⲛⲁ‐ <text:line-break/><text:span text:style-name="T1"> </text:span><text:span text:style-name="T2">(112/8) </text:span> ⲧⲡⲉ· ⲁϥⲟⲩⲱⲛ̅ϩ̅ ⲉⲃⲟⲗ ⲙ̅ⲡⲕⲟⲥ‐ <text:line-break/><text:span text:style-name="T1"> </text:span><text:span text:style-name="T2">(112/9) </text:span> ⲙⲟⲥ ⲛ̅ϭⲓ ⲟⲩⲛⲟϭ ⲛ̅ⲁⲙⲁϩⲧⲉ ⲙ̅ⲛ̅ <text:line-break/><text:span text:style-name="T1"> </text:span><text:span text:style-name="T2">(112/10) </text:span> ⲟⲩⲛⲟϭ ⲛ̅ⲉⲟⲟⲩ· ⲁⲩⲱ ⲡⲱⲛ̅ϩ̅ ⲛ̅‐ <text:line-break/><text:span text:style-name="T1"> </text:span><text:span text:style-name="T2">(112/11) </text:span> ⲧⲡⲉ ⲉϥⲟⲩⲱϣ ⲉⲣ̅ ⲡⲧⲏⲣ̅ϥ̅ ⲃ̅ⲃ̅ⲣ̅ⲣⲉ <text:line-break/><text:span text:style-name="T1"> </text:span><text:span text:style-name="T2">(112/12) </text:span> ⲉⲧⲣⲉϥⲛⲟⲩϫⲉ ⲉⲃⲟⲗ ⲙ̅ⲡⲉⲧ’‐ <text:line-break/><text:span text:style-name="T1"> </text:span><text:span text:style-name="T2">(112/13) </text:span> ϭⲟⲛ ⲁⲩⲱ ⲥⲭⲏⲙⲁ ⲛⲓⲙ ⲛ̅ⲕⲁⲙⲉ <text:line-break/><text:span text:style-name="T1"> </text:span><text:span text:style-name="T2">(112/14) </text:span> ⲉⲧⲣⲉ ⲟⲩⲟⲛ ⲛⲓⲙ ⲡⲓⲣⲉ ϩ̅ⲛ̅ ϩⲉⲛ <text:line-break/><text:span text:style-name="T1"> </text:span><text:span text:style-name="T2">(112/15) </text:span> ϩ̅ⲃ̅ⲥⲱ ⲛ̅ⲧⲉ ⲙ̅ⲡⲏⲩⲉ· ⲉⲟⲩⲱⲛ̅ϩ̅ <text:line-break/><text:span text:style-name="T1"> </text:span><text:span text:style-name="T2">(112/16) </text:span> ⲉⲃⲟⲗ ⲙ̅ⲡⲟⲩⲁϩ ⲥⲁϩⲛⲉ ⲙ̅ⲡⲓⲱⲧ’ <text:line-break/><text:span text:style-name="T1"> </text:span><text:span text:style-name="T2">(112/17) </text:span> ⲉϥⲡ̅ⲣ̅ⲣⲓⲱⲟⲩ ⲉⲙⲁⲧⲉ· ⲁⲩⲱ ⲉⲧⲣⲉϥ <text:line-break/><text:span text:style-name="T1"> </text:span><text:span text:style-name="T2">(112/18) </text:span> ϯ ⲕⲗⲟⲙ ⲛ̅ⲛⲉⲧⲟⲩⲱϣ ⲉϣⲱϫⲉ <text:line-break/><text:span text:style-name="T1"> </text:span><text:span text:style-name="T2">(112/19) </text:span> ⲕⲁⲗⲱⲥ· ⲉⲣⲉⲡⲉⲭ̅ⲥ̅ ⲟ͂ ⲛ̅ⲁⲅⲱⲛⲟ‐ <text:line-break/><text:span text:style-name="T1"> </text:span><text:span text:style-name="T2">(112/20) </text:span> ⲑⲉⲧⲏⲥ· ⲡⲉⲛⲧⲁϥϯ ⲕⲗⲟⲙ ⲛ̅ⲟⲩ‐ <text:line-break/><text:span text:style-name="T1"> </text:span><text:span text:style-name="T2">(112/21) </text:span> ⲟⲛ ⲛⲓⲙ ⲉϥⲧⲥⲁⲃⲟ ⲛ̅ⲟⲩⲟⲛ ⲛⲓⲙ <text:line-break/><text:span text:style-name="T1"> </text:span><text:span text:style-name="T2">(112/22) </text:span> ⲉϣⲱϫⲉ· ⲡⲁⲓ̈ ⲛ̅ⲧⲁϥϣⲱϫⲉ ⲛ̅‐ <text:line-break/><text:span text:style-name="T1"> </text:span><text:span text:style-name="T2">(112/23) </text:span> ϣⲱⲣ̅ⲡ̅ ⲁϥϫⲓ ⲡⲉⲕⲗⲟⲙ ⲁϥⲣ̅ ϫⲱⲱ‐ <text:line-break/><text:span text:style-name="T1"> </text:span><text:span text:style-name="T2">(112/24) </text:span> ⲣⲉ ⲁϥⲟⲩⲱⲛ̅ϩ̅ ⲉⲃⲟⲗ ⲉϥⲣ̅ ⲟⲩⲟⲉⲓⲛ <text:line-break/><text:span text:style-name="T1"> </text:span><text:span text:style-name="T2">(112/25) </text:span> ⲉⲟⲩⲟⲛ ⲛⲓⲙ· ⲡⲧⲏⲣ̅ϥ̅ ⲇⲉ ⲛ̅ⲧⲁⲩ‐ <text:line-break/><text:span text:style-name="T1"> </text:span><text:span text:style-name="T2">(112/26) </text:span> ⲁⲁⲩ ⲃ̅ⲃ̅ⲣ̅ⲣⲉ ϩ̅ⲙ̅ ⲡⲉⲡ̅ⲛⲁ̅ ⲉⲧⲟⲩⲁⲁⲃ <text:line-break/><text:span text:style-name="T1"> </text:span><text:span text:style-name="T2">(112/27) </text:span> ⲙ̅ⲛ̅ ⲡⲛⲟⲩⲥ· ⲡϫⲟⲉⲓⲥ ⲡ̅ⲡⲁⲛⲧⲟ‐ <text:line-break/><text:span text:style-name="T1"> </text:span><text:span text:style-name="T2">(112/28) </text:span> ⲕⲣⲁⲧⲱⲣ ϯⲛⲁϯ ⲛⲁⲕ ⲟⲩⲏⲣ ⲛ̅‐ <text:line-break/><text:span text:style-name="T1"> </text:span><text:span text:style-name="T2">(112/29) </text:span> ⲉⲟⲟⲩ· ⲙ̅ⲡⲉⲗⲁⲁⲩ ⲇⲉ ϭⲙ̅ϭⲟⲙ <text:line-break/><text:span text:style-name="T1"> </text:span><text:span text:style-name="T2">(112/30) </text:span> ⲉϯ ⲉⲟⲟⲩ ⲙ̅ⲡⲛⲟⲩⲧⲉ ⲛ̅ⲑⲉ ⲉⲧ̅ϥ̅ <text:line-break/><text:span text:style-name="T1"> </text:span><text:span text:style-name="T2">(112/31) </text:span> ⲟ̅ ⲙ̅ⲙⲟⲥ· ⲛ̅ⲧⲟⲕ ⲡⲉⲛⲧⲁⲕϯ ⲉⲟ‐ <text:line-break/><text:span text:style-name="T1"> </text:span><text:span text:style-name="T2">(112/32) </text:span> ⲟⲩ ⲙ̅ⲡⲉⲕⲗⲟⲅⲟⲥ ⲉⲧⲟⲩϫⲉ ⲟⲩ‐ <text:line-break/><text:span text:style-name="T1"> </text:span><text:span text:style-name="T2">(112/33) </text:span> ⲟⲛ ⲛⲓⲙ ⲡⲛⲁⲏⲧ ⲛ̅ⲛⲟⲩⲧⲉ· ⲡⲉⲛ‐ <text:line-break/><text:span text:style-name="T1"> </text:span><text:span text:style-name="T2">(112/34) </text:span> ⲧⲁϥⲉⲓ ⲉⲃⲟⲗ ϩ̅ⲛ̅ ⲣⲱⲕ ⲁⲩⲱ ⲉϩⲣⲁⲓ̈ ϩ̅ⲙ̅ <text:line-break/><text:span text:style-name="T1"> </text:span><text:span text:style-name="T2">(112/35) </text:span> ⲡⲉⲕϩⲏⲧ’· ⲡϣⲣ̅ⲡ̅ ⲙ̅ⲙⲓⲥⲉ ⲧⲥⲟ‐ <text:line-break/><text:span text:style-name="T1"> </text:span><text:span text:style-name="T2">(112/36) </text:span> ⲫⲓⲁ· ⲡϣⲣ̅ⲡ̅ ⲛ̅ⲧⲩⲡⲟⲥ· ⲡϣⲟⲣ̅ⲡ̅ <text:line-break/><text:span text:style-name="T1"> </text:span><text:span text:style-name="T2">(112/37) </text:span> ⲛ̅ⲟⲩⲟⲉⲓⲛ· ⲟⲩⲟⲉⲓⲛ ⲅⲁⲣ ⲡⲉ ⲉⲃⲟⲗ <text:line-break/><text:span text:style-name="T1"> </text:span><text:span text:style-name="T2">(113/1) </text:span> ϩ̅ⲛ̅ ⲧϭⲟⲙ ⲛ̅ⲧⲉ ⲡⲛⲟⲩⲧⲉ· ⲁⲩⲱ ⲟⲩ‐ <text:line-break/><text:span text:style-name="T1"> </text:span><text:span text:style-name="T2">(113/2) </text:span> ϩⲉϯⲉ ⲡⲉ ⲛ̅ⲧⲉ ⲡⲉⲟⲟⲩ ⲉⲧⲟⲩⲁⲁⲃ <text:line-break/><text:span text:style-name="T1"> </text:span><text:span text:style-name="T2">(113/3) </text:span> ⲙ̅ⲡ̅ⲡⲁⲛⲧⲟⲕⲣⲁⲧⲱⲣ· ⲁⲩⲱ ϯⲁⲗ <text:line-break/><text:span text:style-name="T1"> </text:span><text:span text:style-name="T2">(113/4) </text:span> ⲉⲧⲟⲩⲁⲁⲃ ⲡⲉ ⲛ̅ⲧⲉⲛⲉⲣⲅⲓⲁ ⲙ̅ⲡ̅ <text:line-break/><text:span text:style-name="T1"> </text:span><text:span text:style-name="T2">(113/5) </text:span> ⲡⲛⲟⲩⲧⲉ· ⲁⲩⲱ ⲑⲓⲕⲱⲛ ⲡⲉ ⲛ̅ⲧⲉϥ‐ <text:line-break/><text:span text:style-name="T1"> </text:span><text:span text:style-name="T2">(113/6) </text:span> ⲙ̅ⲛ̅ⲧ̅’̅ⲁⲅⲁⲑⲟⲥ· ⲕⲁⲓ ⲅⲁⲣ ⲡⲟⲩⲟⲉⲓⲛ <text:line-break/><text:span text:style-name="T1"> </text:span><text:span text:style-name="T2">(113/7) </text:span> ⲛ̅ⲧⲉ ⲡⲟⲩⲟⲉ̣[ⲓ]ⲛ ⲡⲉ ϣⲁ ⲉⲛⲉϩ· ⲑⲟ‐ <text:line-break/><text:span text:style-name="T1"> </text:span><text:span text:style-name="T2">(113/8) </text:span> ⲣⲁⲥⲓⲥ ⲡⲉ ⲉⲧϭⲱϣ̅ⲧ̅’̅ ⲛ̅ⲥⲁ ⲡⲓⲁⲧⲛⲁⲩ <text:line-break/><text:span text:style-name="T1"> </text:span><text:span text:style-name="T2">(113/9) </text:span> ⲉⲣⲟϥ ⲛ̅ⲉⲓⲱⲧ’· ⲉϥⲣ̅ⲇⲓⲁⲕⲟⲛⲓ ⲛ̅‐ <text:line-break/><text:span text:style-name="T1"> </text:span><text:span text:style-name="T2">(113/10) </text:span> ⲟⲩⲟⲉⲓϣ ⲛⲓⲙ· ⲁⲩⲱ ⲉϥⲙⲟⲩⲛ̅ⲅ̅ <text:line-break/><text:soft-page-break/><text:span text:style-name="T1"> </text:span><text:span text:style-name="T2">(113/11) </text:span> ϩ̅ⲙ̅ ⲡⲟⲩⲱϣ ⲙ̅ⲡⲓⲱⲧ’· ⲡⲉⲛⲧⲁⲩ <text:line-break/><text:span text:style-name="T1"> </text:span><text:span text:style-name="T2">(113/12) </text:span> ϫⲡⲟϥ ⲟⲩⲁⲁϥ ϩ̅ⲙ̅ ⲡⲱⲕ ⲛ̅ϩⲏⲧ’ ⲙ̅‐ <text:line-break/><text:span text:style-name="T1"> </text:span><text:span text:style-name="T2">(113/13) </text:span> ⲡⲓⲱⲧ’· ⲟⲩⲗⲟⲅⲟⲥ ⲅⲁⲣ ⲛ̅ⲛⲁⲧⲁ‐ <text:line-break/><text:span text:style-name="T1"> </text:span><text:span text:style-name="T2">(113/14) </text:span> ⲙⲁϩⲧⲉ ⲙ̅ⲙⲟϥ ⲡⲉ · ⲁⲩⲱ ⲧⲥⲟ‐ <text:line-break/><text:span text:style-name="T1"> </text:span><text:span text:style-name="T2">(113/15) </text:span> ⲫⲓⲁ ⲙ̅ⲛ̅ ⲡⲱⲛ̅ϩ̅ ⲡⲉ· ⲛ̅ⲍⲱⲟⲛ ⲧⲏ‐ <text:line-break/><text:span text:style-name="T1"> </text:span><text:span text:style-name="T2">(113/16) </text:span> ⲣⲟⲩ ⲙ̅ⲛ̅ ⲛ̅ϭⲟⲙ ⲉϥⲧ̅ⲛ̅ϩⲟ ⲁⲩⲱ ⲉϥ‐ <text:line-break/><text:span text:style-name="T1"> </text:span><text:span text:style-name="T2">(113/17) </text:span> ⲥⲁⲛ̅ϣ̅ ⲙ̅ⲙⲟⲟⲩ· ⲕⲁⲧⲁ ⲑⲉ ⲉⲧⲉ‐ <text:line-break/><text:span text:style-name="T1"> </text:span><text:span text:style-name="T2">(113/18) </text:span> ⲣⲉ ⲧⲯⲩⲭⲏ ⲧ̅ⲛ̅ϩⲟ ⲛ̅ⲛ̅ⲙ̅ⲙⲉⲗⲟⲥ ⲧⲏ‐ <text:line-break/><text:span text:style-name="T1"> </text:span><text:span text:style-name="T2">(113/19) </text:span> ⲣⲟⲩ · ⲉϥⲁⲙⲁϩⲧⲉ ⲙ̅ⲡⲧⲏⲣ̅ϥ̅ ϩ̅ⲛ̅ <text:line-break/><text:span text:style-name="T1"> </text:span><text:span text:style-name="T2">(113/20) </text:span> ⲧϭⲟⲙ ⲁⲩⲱ ⲉϥⲧⲛ̅ϩⲟ ⲙ̅ⲙⲟⲟⲩ· <text:line-break/><text:span text:style-name="T1"> </text:span><text:span text:style-name="T2">(113/21) </text:span> ⲛ̅ⲧⲟϥ ⲅⲁⲣ ⲡⲉ ⲧⲉϩⲟⲩⲉⲓⲧⲉ ⲁⲩⲱ <text:line-break/><text:span text:style-name="T1"> </text:span><text:span text:style-name="T2">(113/22) </text:span> ⲑⲁⲏ ⲛ̅ⲟⲩⲟⲛ ⲛⲓⲙ· ⲉϥⲣⲟⲉⲓⲥ ⲉ‐ <text:line-break/><text:span text:style-name="T1"> </text:span><text:span text:style-name="T2">(113/23) </text:span> ⲡⲧⲏⲣϥ̅ ⲁⲩⲱ ⲉϥⲕⲱⲧⲉ ⲉⲣⲟⲟⲩ· <text:line-break/><text:span text:style-name="T1"> </text:span><text:span text:style-name="T2">(113/24) </text:span> ϥϩⲟⲥⲉ ⲇⲉ ϩⲁ ⲟⲩⲟⲛ̅ ⲛⲓⲙ ⲁⲩⲱ ϥⲣⲁ‐ <text:line-break/><text:span text:style-name="T1"> </text:span><text:span text:style-name="T2">(113/25) </text:span> ϣⲉ· ⲁⲩⲱⲟⲛ ϥ̅ⲣ̅ ϩⲏⲃⲉ· ϥ̅ⲣ̅ ϩⲏⲃⲉ <text:line-break/><text:span text:style-name="T1"> </text:span><text:span text:style-name="T2">(113/26) </text:span> ⲙⲉⲛ ϩⲁ ⲛⲉⲛⲧⲁⲩⲕⲗⲏⲣⲟⲩ ⲉⲡⲧⲟ‐ <text:line-break/><text:span text:style-name="T1"> </text:span><text:span text:style-name="T2">(113/27) </text:span> ⲡⲟⲥ ⲛ̅ⲧⲕⲟⲗⲁⲥⲓⲥ· ϥϩⲟⲥⲉ ⲇⲉ <text:line-break/><text:span text:style-name="T1"> </text:span><text:span text:style-name="T2">(113/28) </text:span> ϩⲁ ⲟⲩⲟⲛ ⲛⲓⲙ ⲛⲁⲓ̈ ⲉⲧϥ̅ⲉⲓⲛⲉ ⲙ̅‐ <text:line-break/><text:span text:style-name="T1"> </text:span><text:span text:style-name="T2">(113/29) </text:span> ⲙⲟⲟⲩ ⲉϩⲟⲩⲛ ⲉⲧ’ⲥⲃⲱ ϩ̅ⲛ̅ ⲟⲩϩⲓ̅‐ <text:line-break/><text:span text:style-name="T1"> </text:span><text:span text:style-name="T2">(113/30) </text:span> ⲥⲉ· ϥⲣⲁϣⲉ ⲇⲉ ϩⲁ ⲟⲩⲟⲛ ⲛⲓⲙ ⲉⲧ‐ <text:line-break/><text:span text:style-name="T1"> </text:span><text:span text:style-name="T2">(113/31) </text:span> ϣⲟⲟⲡ ϩ̅ⲙ̅ ⲡⲧ̅ⲃ̅ⲃⲟ· ⲁⲣⲉϩ ϭⲉ ⲉⲣⲟⲕ <text:line-break/><text:span text:style-name="T1"> </text:span><text:span text:style-name="T2">(113/32) </text:span> ⲙⲏⲡⲱⲥ ⲛ̅ⲅ̅ϩⲉ ⲉⲧⲟⲟⲩⲧⲟⲩ ⲛ̅ⲛⲓ‐ <text:line-break/><text:span text:style-name="T1"> </text:span><text:span text:style-name="T2">(113/33) </text:span> ⲗⲏⲥⲧⲏⲥ· ⲁⲩⲱ ⲙ̅ⲡ̅ⲣ̅ϯ ⲛ̅ⲟⲩϩ̅ⲓ̅ <text:line-break/><text:span text:style-name="T1"> </text:span><text:span text:style-name="T2">(113/34) </text:span> ⲛⲏⲃ ⲛ̅ⲛⲉⲕⲃⲁⲗ· ⲟⲩⲇⲉ ⲙ̅ⲡ̅ⲣ̅ϯ ⲛ̅‐ <text:line-break/><text:span text:style-name="T1"> </text:span><text:span text:style-name="T2">(113/35) </text:span> ⲛⲟⲩⲣⲉⲕⲣ[ⲓ]ⲕⲉ ⲛ̅ⲛⲉⲕⲃⲁϩⲟⲩ· ϫⲉ‐ <text:line-break/><text:span text:style-name="T1"> </text:span><text:span text:style-name="T2">(113/36) </text:span> ⲕⲁⲁⲥ ⲉⲕⲉⲛⲟⲩϩ̅ⲙ̅ ⲛ̅ⲑⲉ ⲛ̅ⲟⲩϭⲟϩ <text:line-break/><text:span text:style-name="T1"> </text:span><text:span text:style-name="T2">(113/37) </text:span> ⲥⲉ ⲉϩⲉⲛⲉⲗⲱ· ⲁⲩⲱ ⲛ̅ⲑⲉ ⲛ̅ⲟⲩ‐ <text:line-break/><text:span text:style-name="T1"> </text:span><text:span text:style-name="T2">(114/1) </text:span> ϩⲁⲗⲏⲧ’ ⲉⲩⲡⲁϣⲥϥ· ϣⲱϫⲉ ⲙ̅ⲡ̅‐ <text:line-break/><text:span text:style-name="T1"> </text:span><text:span text:style-name="T2">(114/2) </text:span> ⲛⲟϭ ⲛ̅ⲁⲅⲱⲛ ϩⲉⲱⲥ ⲡⲁⲅⲱⲛ ⲕⲁⲁⲧ <text:line-break/><text:span text:style-name="T1"> </text:span><text:span text:style-name="T2">(114/3) </text:span> ⲉϩⲣⲁⲓ̈· ⲉⲣⲉⲛ̅ⲇⲩⲛⲁⲙⲓⲥ ⲧⲏⲣⲟⲩ <text:line-break/><text:span text:style-name="T1"> </text:span><text:span text:style-name="T2">(114/4) </text:span> ⲉⲓⲟⲣ̅ⲙ̅ ⲛ̅ⲥⲱⲕ [ⲛ]ⲉⲧⲟⲩⲁⲁⲃ ⲇⲉ <text:line-break/><text:span text:style-name="T1"> </text:span><text:span text:style-name="T2">(114/5) </text:span> ⲟⲩⲁⲁⲩ ⲁⲛ ⲁⲗⲗⲁ ⲛ̅ⲕⲉⲇⲩⲛⲁⲙⲓⲥ ⲧⲏ‐ <text:line-break/><text:span text:style-name="T1"> </text:span><text:span text:style-name="T2">(114/6) </text:span> ⲣⲟⲩ ⲙ̅ⲡⲁⲛⲧⲓⲕⲓⲙ[ⲉ]ⲛⲟⲥ· ⲟⲩⲟⲉⲓ <text:line-break/><text:span text:style-name="T1"> </text:span><text:span text:style-name="T2">(114/7) </text:span> ⲛⲁⲕ ⲉⲩϣⲁⲛϫⲣⲟ [ⲉⲣ]ⲟⲕ ⲛ̅ⲧⲙⲏⲧⲉ <text:line-break/><text:span text:style-name="T1"> </text:span><text:span text:style-name="T2">(114/8) </text:span> ⲛ̅ⲟⲩⲟⲛ ⲛⲓⲙ ⲉⲧ’ϭⲁϣ̅ⲧ̅ ⲛ̅ⲥⲱⲕ· <text:line-break/><text:span text:style-name="T1"> </text:span><text:span text:style-name="T2">(114/9) </text:span> ⲉⲕϣⲁⲛϣⲱϫⲉ ⲙ̅ⲡⲁⲅⲱⲛ ⲁⲩⲱ <text:line-break/><text:span text:style-name="T1"> </text:span><text:span text:style-name="T2">(114/10) </text:span> ⲛ̅ⲅ̅ϫⲣⲟ ⲁⲛⲇⲩⲛⲁⲙⲓⲥ ⲉⲧ’ϯ ⲟⲩⲃⲏⲕ <text:line-break/><text:span text:style-name="T1"> </text:span><text:span text:style-name="T2">(114/11) </text:span> ⲕⲛⲁⲕⲱ ⲛ̅ⲟⲩⲛⲟϭ ⲛ̅ⲣⲁϣⲉ ⲛ̅ⲟⲩⲟⲛ <text:line-break/><text:span text:style-name="T1"> </text:span><text:span text:style-name="T2">(114/12) </text:span> ⲛⲓⲙ ⲉⲧⲟⲩⲁⲁⲃ· ⲁⲩⲱ ⲕⲛⲁⲕⲱ ⲛ̅‐ <text:line-break/><text:span text:style-name="T1"> </text:span><text:span text:style-name="T2">(114/13) </text:span> ⲟⲩⲛⲟϭ ⲛ̅ϩⲏⲃⲉ ⲛ̅ⲛⲉⲕϫⲁϫⲉ ⲡⲉⲕ‐ <text:line-break/><text:span text:style-name="T1"> </text:span><text:span text:style-name="T2">(114/14) </text:span> ⲁⲅⲱⲛⲟⲑⲉⲧⲏⲥ ⲧⲏⲣ̅ϥ̅ ⲣ̅ⲃⲟⲏⲑⲉⲓ <text:line-break/><text:span text:style-name="T1"> </text:span><text:span text:style-name="T2">(114/15) </text:span> ⲉϥⲟⲩⲱϣ ⲉⲧⲣⲉⲕϫⲣⲟ· ⲥⲱⲧ̅ⲙ̅ ⲡⲁ‐ <text:line-break/><text:span text:style-name="T1"> </text:span><text:span text:style-name="T2">(114/16) </text:span> ϣⲏⲣⲉ ⲁⲩⲱ ⲙ̅ⲡ̅ⲣ̅ϣⲱⲡⲉ ⲉⲕⲱⲥ̅ⲕ̅ <text:line-break/><text:span text:style-name="T1"> </text:span><text:span text:style-name="T2">(114/17) </text:span> ϩ̅ⲛ̅ ⲛⲉⲕⲙⲁⲁϫⲉ· ⲧⲱⲱⲛ ⲙ̅ⲙⲟⲕ <text:line-break/><text:span text:style-name="T1"> </text:span><text:span text:style-name="T2">(114/18) </text:span> ⲉϩⲣⲁⲓ̈ ⲉⲁⲕⲕⲱ ⲛ̅ⲥⲱⲕ ⲙ̅ⲡⲉⲕⲣ̅ⲙ̅ⲛ̅ <text:line-break/><text:span text:style-name="T1"> </text:span><text:span text:style-name="T2">(114/19) </text:span> ⲁⲥ ⲛ̅ⲑⲉ ⲛ̅ⲛⲓⲁⲉⲧⲟⲥ· ⲁⲣⲓ ϩⲟⲧⲉ ϩⲏ <text:line-break/><text:span text:style-name="T1"> </text:span><text:span text:style-name="T2">(114/20) </text:span> ⲧ̅ϥ̅ ⲙ̅ⲡⲛⲟⲩⲧⲉ ϩⲣⲁⲓ̈ ϩ̅ⲛ̅ ⲛⲉⲕⲡⲣⲁⲝⲓⲥ <text:line-break/><text:soft-page-break/><text:span text:style-name="T1"> </text:span><text:span text:style-name="T2">(114/21) </text:span> ⲧⲏⲣⲟⲩ· ⲁⲩⲱ ⲉⲃⲟⲗ ϩ̅ⲓ̅ⲧ̅ⲙ̅ ⲫⲱⲃ ⲉⲧ <text:line-break/><text:span text:style-name="T1"> </text:span><text:span text:style-name="T2">(114/22) </text:span> ⲛⲁⲛⲟⲩϥ ϯ ⲉⲟⲟⲩ ⲙ̅ⲡⲛⲟⲩⲧⲉ· <text:line-break/><text:span text:style-name="T1"> </text:span><text:span text:style-name="T2">(114/23) </text:span> ⲉⲕⲥⲟⲟⲩⲛ ϫⲉ ⲣⲱⲙⲉ ⲛⲓⲙ ⲉⲧⲣ̅ ⲁ‐ <text:line-break/><text:span text:style-name="T1"> </text:span><text:span text:style-name="T2">(114/24) </text:span> ⲛⲁϥ ⲁⲛ ⲙ̅ⲡ̅ⲛⲟⲩⲧⲉ· ⲡϣⲏⲣⲉ ⲙ̅ⲡⲧⲁ‐ <text:line-break/><text:span text:style-name="T1"> </text:span><text:span text:style-name="T2">(114/25) </text:span> ⲕⲟ ⲡⲉ· ϥⲛⲁⲃⲱⲕ ⲉϩⲣⲁⲓ̈ ⲉⲡⲛⲟⲩⲛ <text:line-break/><text:span text:style-name="T1"> </text:span><text:span text:style-name="T2">(114/26) </text:span> ⲛ̅ⲁⲙ̅ⲛ̅ⲧⲉ· ⲱ͂ ϯⲙ̅ⲛⲧ̅ϩⲁⲣ̅ϣ̅ϩⲏⲧ’ <text:line-break/><text:span text:style-name="T1"> </text:span><text:span text:style-name="T2">(114/27) </text:span> ⲛ̅ⲧⲉ ⲡⲛⲟⲩⲧⲉ ⲉⲧ̅ⲣ̅ⲁⲛⲉⲭⲉ ⲛ̅ⲟⲩ‐ <text:line-break/><text:span text:style-name="T1"> </text:span><text:span text:style-name="T2">(114/28) </text:span> ⲟⲛ ⲛⲓⲙ· ⲧⲁⲓ̈ ⲉⲧⲟⲩⲱϣ ⲉⲧⲣⲉⲟⲩ‐ <text:line-break/><text:span text:style-name="T1"> </text:span><text:span text:style-name="T2">(114/29) </text:span> ⲟⲛ ⲛⲓⲙ ⲟⲩϫⲁⲓ̈· ⲛⲁⲓ̈ ⲛ̅ⲧⲁⲩϣⲱⲡⲉ <text:line-break/><text:span text:style-name="T1"> </text:span><text:span text:style-name="T2">(114/30) </text:span> ϩⲁ ⲡⲛⲟⲃⲉ· ⲁⲗⲗⲁ ⲙ̅ⲙ̅ⲛ̅ ⲗⲁⲁⲩ ⲣ̅ⲕⲱ‐ <text:line-break/><text:span text:style-name="T1"> </text:span><text:span text:style-name="T2">(114/31) </text:span> ⲗⲩⲉ ⲙ̅ⲙⲟϥ ⲉⲣ̅ ⲡⲉⲧ̅ϥ̅ⲟⲩⲁϣ̅ϥ̅ <text:line-break/><text:span text:style-name="T1"> </text:span><text:span text:style-name="T2">(114/32) </text:span> ⲛⲓⲙ ⲅⲁⲣ ⲡⲉ ⲡϫⲱⲱⲣⲉ ⲉⲣⲟϥ ϫⲉⲕⲁ‐ <text:line-break/><text:span text:style-name="T1"> </text:span><text:span text:style-name="T2">(114/33) </text:span> ⲁⲥ ⲉϥⲛⲁⲣ̅ⲕⲱⲗⲩⲉ ⲙ̅ⲙⲟϥ· ⲉϣ‐ <text:line-break/><text:span text:style-name="T1"> </text:span><text:span text:style-name="T2">(114/34) </text:span> ϫⲉ ⲛ̅ⲧⲟϥ ⲡⲉⲧ’ϫⲱϩ ⲉⲡⲕⲁϩ ⲉϥ‐ <text:line-break/><text:span text:style-name="T1"> </text:span><text:span text:style-name="T2">(114/35) </text:span> ⲧⲣⲉϥⲥⲧⲱⲧ’· ⲁⲩⲱ ⲟⲛ ⲉϥⲧⲣⲉ‐ <text:line-break/><text:span text:style-name="T1"> </text:span><text:span text:style-name="T2">(114/36) </text:span> ⲛ̅ⲧⲟⲩⲉⲓⲏ ϯ ⲕⲁⲡⲛⲟⲥ· ⲡⲉⲛⲧⲁϥ <text:line-break/><text:span text:style-name="T1"> </text:span><text:span text:style-name="T2">(114/37) </text:span> ⲥⲱⲟⲩϩ ⲉϩⲟⲩⲛ ⲛ̅ⲑⲁⲗⲁⲥⲥⲁ <text:line-break/><text:span text:style-name="T1"> </text:span><text:span text:style-name="T2">(115/1) </text:span> ⲛ̅ϯⲁⲉⲓⲏ ⲛ̅ⲁⲑⲉ ⲛ̅ⲛⲓⲁⲥⲕⲟⲥ· ⲁⲩⲱ <text:line-break/><text:span text:style-name="T1"> </text:span><text:span text:style-name="T2">(115/2) </text:span> ⲁϥϣⲓ ⲡⲙⲟⲟⲩ ⲧⲏⲣ̅ϥ̅ ϩ̅ⲛ̅ ⲧⲉϥϩ̅ⲃ̅‐ <text:line-break/><text:span text:style-name="T1"> </text:span><text:span text:style-name="T2">(115/3) </text:span> ϩⲉ· ⲁⲩⲱ ⲧϭⲓϫ ⲛ̅ⲟⲩⲱⲧ’ ⲙ̅ⲡϫⲟ‐ <text:line-break/><text:span text:style-name="T1"> </text:span><text:span text:style-name="T2">(115/4) </text:span> ⲉⲓⲥ ⲧⲉⲛⲧⲁⲥⲧⲁⲙⲓⲉ ⲛⲁⲓ̈ ⲧⲏⲣⲟⲩ <text:line-break/><text:span text:style-name="T1"> </text:span><text:span text:style-name="T2">(115/5) </text:span> ⲧⲁⲓ̈ ⲅⲁⲣ ⲧⲉ ⲡⲉⲭ̅ⲥ̅ ⲧ̣ϭⲓϫ ⲙ̅ⲡⲓⲱⲧ <text:line-break/><text:span text:style-name="T1"> </text:span><text:span text:style-name="T2">(115/6) </text:span> ⲁⲩⲱ ⲉⲥⲙⲟⲩⲛ̣̅̅ⲅ̅ ⲙ̅ⲡⲧⲏⲣ̅ϥ̅· ⲉ‐ <text:line-break/><text:span text:style-name="T1"> </text:span><text:span text:style-name="T2">(115/7) </text:span> ⲃⲟⲗ ϩ̅ⲓ̅ ⲧⲟⲧ[̅ϥ̅ ⲛ̅]ⲧⲁⲡⲧⲏⲣ̅ϥ̅ ϣⲱ‐ <text:line-break/><text:span text:style-name="T1"> </text:span><text:span text:style-name="T2">(115/8) </text:span> ⲡⲉ· ⲉⲁⲥϣⲱ[ⲡ]ⲉ ⲙ̅ⲙⲁⲁⲩ ⲙ̅ⲡⲧⲏ‐ <text:line-break/><text:span text:style-name="T1"> </text:span><text:span text:style-name="T2">(115/9) </text:span> ⲣ̅ϥ̅· ⲛ̅ⲧⲟϥ ⲅⲁⲣ ⲡⲉ ⲛ̅ⲟⲩⲟⲉⲓϣ ⲛⲓⲙ <text:line-break/><text:span text:style-name="T1"> </text:span><text:span text:style-name="T2">(115/10) </text:span> ⲉϥϣⲟⲟⲡ ⲛ̅ϣⲏⲣⲉ ⲙ̅ⲡⲓⲱⲧ’· ⲁⲣⲓ‐ <text:line-break/><text:span text:style-name="T1"> </text:span><text:span text:style-name="T2">(115/11) </text:span> ⲛⲟⲉⲓ ⲛⲁⲓ̈ ⲙ̅ⲡⲛⲟⲩⲧⲉ ⲡ̅ⲡⲁⲛⲧⲟ‐ <text:line-break/><text:span text:style-name="T1"> </text:span><text:span text:style-name="T2">(115/12) </text:span> ⲕⲣⲁⲧⲱⲣ ⲉⲧ’ϣⲟⲟⲡ ⲛ̅ⲟⲩⲟⲉⲓϣ <text:line-break/><text:span text:style-name="T1"> </text:span><text:span text:style-name="T2">(115/13) </text:span> ⲛⲓⲙ· ⲛ̅ⲛⲉⲣⲉⲡⲁⲓ̈ ϣⲟⲟⲡ ⲁⲛ ⲉϥⲉ‐ <text:line-break/><text:span text:style-name="T1"> </text:span><text:span text:style-name="T2">(115/14) </text:span> ⲛ̅ⲣ̅ⲣⲟ ⲛ̅ⲟⲩⲟⲉⲓϣ ⲛⲓⲙ· ⲙⲏⲡⲱⲥ <text:line-break/><text:span text:style-name="T1"> </text:span><text:span text:style-name="T2">(115/15) </text:span> ⲛϥ̅ϣⲱⲡⲉ ⲉϥϣⲁⲁⲧ’ ⲙ̅ⲡϣⲏⲣⲉ <text:line-break/><text:span text:style-name="T1"> </text:span><text:span text:style-name="T2">(115/16) </text:span> ⲛ̅ⲑⲉⲓⲟⲥ· ⲉⲣⲉⲡⲧⲏⲣ̅ϥ̅ ⲅⲁⲣ ⲟⲩⲏϩ <text:line-break/><text:span text:style-name="T1"> </text:span><text:span text:style-name="T2">(115/17) </text:span> ϩ̅ⲙ̅ ⲡⲛⲟⲩⲧⲉ· ⲛⲉⲛⲧⲁⲩϣⲱⲡⲉ <text:line-break/><text:span text:style-name="T1"> </text:span><text:span text:style-name="T2">(115/18) </text:span> ⲉⲃⲟⲗ ϩ̅ⲓ̅ⲧ̅ⲙ̅ ⲡⲗⲟⲅⲟⲥ ⲉⲧⲉ ⲡⲁⲓ̈ ⲡⲉ <text:line-break/><text:span text:style-name="T1"> </text:span><text:span text:style-name="T2">(115/19) </text:span> ⲡⲁϣⲏⲣⲉ ⲛ̅ⲑⲓⲕⲱⲛ ⲙ̅ⲡⲓⲱⲧ’· ⲡⲛⲟⲩ‐ <text:line-break/><text:span text:style-name="T1"> </text:span><text:span text:style-name="T2">(115/20) </text:span> ⲧⲉ ⲅⲁⲣ ⲡⲉⲧ’ϩⲏⲛ ⲉϩⲟⲩⲛ ⲁⲩⲱ ⲉϥ‐ <text:line-break/><text:span text:style-name="T1"> </text:span><text:span text:style-name="T2">(115/21) </text:span> ⲟⲩⲏⲟⲩ ⲉⲃⲟⲗ ⲁⲛ· ⲁⲣⲏϫ̅ϥ̅ ⲛⲓⲙ ⲛ̅‐ <text:line-break/><text:span text:style-name="T1"> </text:span><text:span text:style-name="T2">(115/22) </text:span> ⲑⲉⲓⲟⲛ ⲛⲉ ⲛ̅ⲣ̅ⲙ̅ϩ̅ⲛ̅ⲏⲉⲓ ⲙ̅ⲡⲛⲟⲩ‐ <text:line-break/><text:span text:style-name="T1"> </text:span><text:span text:style-name="T2">(115/23) </text:span> ⲧⲉ· ⲉⲣⲉϣⲁⲛⲡⲓⲑⲉⲓⲟⲛ ϭⲉ ϥⲓ ⲛ̅ⲙ̅‐ <text:line-break/><text:span text:style-name="T1"> </text:span><text:span text:style-name="T2">(115/24) </text:span> ⲙⲁⲕ ϩ̅ⲛ̅ ⲟⲩϩⲱⲃ ⲉⲃⲟⲗ ϩ̅ⲛ̅ ⲟⲩⲙⲉ‐ <text:line-break/><text:span text:style-name="T1"> </text:span><text:span text:style-name="T2">(115/25) </text:span> ⲣⲟⲥ· ⲙ̅ⲙⲉ ϫⲉ ⲡⲑⲉⲓⲟⲛ ⲧⲏⲣ̅ϥ̅ <text:line-break/><text:span text:style-name="T1"> </text:span><text:span text:style-name="T2">(115/26) </text:span> ⲧⲏⲧ ⲛ̅ϩⲏⲧ’ ⲛ̅ⲙ̅ⲙⲁⲕ· ⲙⲁⲣⲉ ⲡⲉ <text:line-break/><text:span text:style-name="T1"> </text:span><text:span text:style-name="T2">(115/27) </text:span> ⲉⲓⲑⲓⲟⲛ ⲇⲉ ⲱⲕ ⲛ̅ϩⲏⲧ’ ⲙ̅ⲙ̅ⲛ̅ ⲗⲁ‐ <text:line-break/><text:span text:style-name="T1"> </text:span><text:span text:style-name="T2">(115/28) </text:span> ⲁⲩ ⲙ̅ⲡⲟⲛⲏⲣⲟⲥ· ⲛ̅ⲧⲟϥ ⲅⲁⲣ ⲡⲉⲧ‐ <text:line-break/><text:span text:style-name="T1"> </text:span><text:span text:style-name="T2">(115/29) </text:span> ϯ ⲥⲃⲱ ⲛ̅ⲣⲱⲙⲉ ⲛⲓⲙ ⲉⲩⲡⲉⲧ‐ <text:line-break/><text:span text:style-name="T1"> </text:span><text:span text:style-name="T2">(115/30) </text:span> ⲛⲁⲛⲟⲩϥ· ⲡⲁⲓ ⲡⲉ ⲛ̅ⲧⲁⲡⲛⲟⲩ‐ <text:line-break/><text:soft-page-break/><text:span text:style-name="T1"> </text:span><text:span text:style-name="T2">(115/31) </text:span> ⲧⲉ ⲧⲁⲁϥ ⲙ̅ⲡⲅⲉⲛⲟⲥ ⲛ̅ⲛ̅ⲣⲱⲙⲉ <text:line-break/><text:span text:style-name="T1"> </text:span><text:span text:style-name="T2">(115/32) </text:span> ϫⲉⲕⲁⲁⲥ ⲉⲧⲃⲉ ⲡⲁⲓ̈ ⲉⲣⲉⲣⲱⲙⲉ <text:line-break/><text:span text:style-name="T1"> </text:span><text:span text:style-name="T2">(115/33) </text:span> ⲛⲓⲙ ⲛⲁϣⲱⲡⲉ ⲉϥⲥⲟⲧ̅ⲡ̅ ⲙ̅‐ <text:line-break/><text:span text:style-name="T1"> </text:span><text:span text:style-name="T2">(115/34) </text:span> ⲡⲉⲙⲧⲟ [ⲉⲃ]ⲟⲗ ⲛ̅ⲛ̅ⲁⲅⲅⲉⲗⲟⲥ <text:line-break/><text:span text:style-name="T1"> </text:span><text:span text:style-name="T2">(115/35) </text:span> ⲧⲏⲣⲟⲩ ⲙ̣̅̅ⲛ̅ ⲛ̅ⲁⲣⲭⲁⲅⲅⲉⲗⲟⲥ <text:line-break/><text:span text:style-name="T1"> </text:span><text:span text:style-name="T2">(115/36) </text:span> ⲙ̅ⲡⲛⲟⲩⲧⲉ ⲅⲁⲣ ϣⲁⲁⲧ’ ⲁⲛ ⲉ‐ <text:line-break/><text:span text:style-name="T1"> </text:span><text:span text:style-name="T2">(115/37) </text:span> ⲧⲣⲉϥⲣ̅ⲇⲟϭⲓⲙⲁⲍⲉ ⲛ̅ⲗⲁⲁⲩ̣ <text:line-break/><text:span text:style-name="T1"> </text:span><text:span text:style-name="T2">(116/1) </text:span> ⲛ̅ⲣⲱⲙⲉ· ϥⲥⲟⲟⲩⲛ ⲛ̅ϩⲱⲃ ⲛⲓⲙ <text:line-break/><text:span text:style-name="T1"> </text:span><text:span text:style-name="T2">(116/2) </text:span> ϩⲁⲑⲏ ⲉⲙⲡⲁⲧⲟⲩϣⲱⲡⲉ· ⲁⲩⲱ <text:line-break/><text:span text:style-name="T1"> </text:span><text:span text:style-name="T2">(116/3) </text:span> ϥⲥⲟⲟⲩⲛ ⲛ̅ⲛⲉⲑⲏⲡ ⲛ̅ⲧⲉ ⲫⲏⲧ’· <text:line-break/><text:span text:style-name="T1"> </text:span><text:span text:style-name="T2">(116/4) </text:span> ⲥⲉϭⲟⲗⲉⲡ ⲇⲉ ⲉⲃⲟⲗ ⲧⲏⲣⲟⲩ ⲁⲩⲱ <text:line-break/><text:span text:style-name="T1"> </text:span><text:span text:style-name="T2">(116/5) </text:span> ⲥⲉϣⲁⲁⲧ’ ⲛ̅ⲛⲁϩ[ⲣⲁ]ϥ· ⲙ̅ⲡ̅ⲣ̅ⲧⲣⲉ <text:line-break/><text:span text:style-name="T1"> </text:span><text:span text:style-name="T2">(116/6) </text:span> ⲗⲁⲁⲩ ϫⲟⲟⲥ ⲉⲛⲉ[ϩ ϫ]ⲉ ⲡⲛⲟⲩⲧⲉ <text:line-break/><text:span text:style-name="T1"> </text:span><text:span text:style-name="T2">(116/7) </text:span> ⲉ ⲛ̅ⲛⲁⲧⲥⲟⲩⲛ· ⲟⲩⲇⲓⲕⲁⲓⲟⲛ ⲅⲁⲣ <text:line-break/><text:span text:style-name="T1"> </text:span><text:span text:style-name="T2">(116/8) </text:span> ⲁⲛ ⲡⲉ ⲉⲛⲉϫ ⲡⲇⲏⲙⲓⲟⲩⲣⲅⲟⲥ ⲛ̅‐ <text:line-break/><text:span text:style-name="T1"> </text:span><text:span text:style-name="T2">(116/9) </text:span> ⲥⲱⲧ̅ⲛ̅ ⲛⲓⲙ ϩ̅ⲛ̅ ⲟⲩⲙ̅ⲛⲧ’̅ⲁⲧ’ⲥⲟⲟⲩⲛ· <text:line-break/><text:span text:style-name="T1"> </text:span><text:span text:style-name="T2">(116/10) </text:span> ⲕⲁⲓ ⲅⲁⲣ ⲛⲉⲧ’ϣⲟⲟⲡ ϩ̅ⲙ̅ ⲡⲕⲁⲕⲉ <text:line-break/><text:span text:style-name="T1"> </text:span><text:span text:style-name="T2">(116/11) </text:span> ⲉⲩϩⲁⲧⲏϥ ⲙ̅ⲡ̅ⲥⲙⲟⲧ’ ⲙ̅ⲡⲟⲩⲟ‐ <text:line-break/><text:span text:style-name="T1"> </text:span><text:span text:style-name="T2">(116/12) </text:span> ⲉⲓⲛ· ⲙ̅ⲙ̅ⲛ̅ ϭⲉ ⲗⲁⲁⲩ ⲅⲁⲣ ϩⲏⲡ ⲉⲓ‐ <text:line-break/><text:span text:style-name="T1"> </text:span><text:span text:style-name="T2">(116/13) </text:span> ⲙⲏⲧⲓ ⲡⲛⲟⲩⲧⲉ ⲟⲩⲁⲁϥ· ϥⲟⲩⲟ <text:line-break/><text:span text:style-name="T1"> </text:span><text:span text:style-name="T2">(116/14) </text:span> ⲛ̅ϩ̅ ⲇⲉ ⲉⲃⲟⲗⲛ̅ⲟⲩⲟⲛ ⲛⲓⲙ· ⲁⲩⲱ <text:line-break/><text:span text:style-name="T1"> </text:span><text:span text:style-name="T2">(116/15) </text:span> ϥϩⲏⲡ ⲉⲙⲁⲧⲉ· ϥⲟⲩⲟⲛϩ̅ ⲇⲉ ⲉⲃⲟⲗ <text:line-break/><text:span text:style-name="T1"> </text:span><text:span text:style-name="T2">(116/16) </text:span> ⲉⲧⲃⲉ ϫⲉ ⲡⲛⲟⲩⲧⲉ ⲥⲟⲟⲩⲛ ⲙ̅‐ <text:line-break/><text:span text:style-name="T1"> </text:span><text:span text:style-name="T2">(116/17) </text:span> ⲡⲧⲏⲣ̅ϥ̅· ⲕⲁⲛ ⲉⲩϣⲁⲛⲧ̅ⲙ̅ⲟⲩⲱϣ <text:line-break/><text:span text:style-name="T1"> </text:span><text:span text:style-name="T2">(116/18) </text:span> ⲉϫⲟⲟⲥ ⲥⲉⲛⲁϫⲡⲓⲟⲟⲩ ⲉⲃⲟⲗ ϩ̅ⲓ̅ <text:line-break/><text:span text:style-name="T1"> </text:span><text:span text:style-name="T2">(116/19) </text:span> ⲧ̅ⲙ̅ ⲡⲟⲩϩⲏⲧ’· ϥϩⲏⲡ ⲇⲉ ⲉⲧⲃⲉ <text:line-break/><text:span text:style-name="T1"> </text:span><text:span text:style-name="T2">(116/20) </text:span> ϫⲉ ⲙ̅ⲙ̅ⲛ̅ ⲗⲁⲁⲩ ⲣ̅ⲛⲟⲓ̈ ⲛ̅ⲛⲁⲡⲛⲟⲩ‐ <text:line-break/><text:span text:style-name="T1"> </text:span><text:span text:style-name="T2">(116/21) </text:span> ⲧⲉ· ⲟⲩⲁⲧ’̅ⲛ̅ⲣⲁⲧ’̅ϥ̅ ⲅⲁⲣ ⲡⲉ ⲁⲩⲱ <text:line-break/><text:span text:style-name="T1"> </text:span><text:span text:style-name="T2">(116/22) </text:span> ⲟⲩⲁⲧϩⲉⲧϩⲱⲧϥ̅ ⲡⲉ ⲉⲥⲟⲩⲱⲛ <text:line-break/><text:span text:style-name="T1"> </text:span><text:span text:style-name="T2">(116/23) </text:span> ⲡϣⲟϫⲛⲉ ⲙ̅ⲡⲛⲟⲩⲧⲉ· ⲡⲁⲗⲓⲛ <text:line-break/><text:span text:style-name="T1"> </text:span><text:span text:style-name="T2">(116/24) </text:span> ⲥⲙⲟⲕ̅ϩ̅ ⲛ̅ⲛ̅ⲣⲁⲧ̅ϥ̅· ⲁⲩⲱ ⲥⲙⲟⲕ̅ϩ̅ <text:line-break/><text:span text:style-name="T1"> </text:span><text:span text:style-name="T2">(116/25) </text:span> ⲛ̅ϭ̅ⲛ̅ ⲡⲉⲭ̅ⲥ̅· ⲛ̅ⲧⲟϥ ⲅⲁⲣ ⲡⲉⲧⲟⲩ‐ <text:line-break/><text:span text:style-name="T1"> </text:span><text:span text:style-name="T2">(116/26) </text:span> ⲏϩ ϩ̅ⲛ̅ ⲧⲟⲡⲟⲥ ⲛⲓⲙ ⲁⲩⲱ ⲟⲛ ⲉϥ‐ <text:line-break/><text:span text:style-name="T1"> </text:span><text:span text:style-name="T2">(116/27) </text:span> ϩ̅ⲛ̅ ⲧⲟⲡⲟⲥ ⲁⲛ· ⲙ̅ⲙ̅ⲛ̅ ⲗⲁⲁⲩ ⲅⲁⲣ <text:line-break/><text:span text:style-name="T1"> </text:span><text:span text:style-name="T2">(116/28) </text:span> ⲉϥⲟⲩⲱϣ ⲛⲁϣϭ̅ⲙ̅ϭⲟⲙ ⲉⲥⲟⲩ‐ <text:line-break/><text:span text:style-name="T1"> </text:span><text:span text:style-name="T2">(116/29) </text:span> ⲱⲛ ⲡⲛⲟⲩⲧⲉ ⲛ̅ⲑⲉ ⲉ[ⲧϥ̅]ϣⲟⲟⲡ <text:line-break/><text:span text:style-name="T1"> </text:span><text:span text:style-name="T2">(116/30) </text:span> ⲙ̅ⲙⲟⲥ· ⲟⲩⲧⲉ ⲡⲉⲭ̅ⲥ̅ ⲟⲩⲧⲉ <text:line-break/><text:span text:style-name="T1"> </text:span><text:span text:style-name="T2">(116/31) </text:span> ⲡⲉⲡⲛ̅ⲁ̅· ⲟⲩⲧⲉ ⲡⲭⲟⲣⲟⲥ ⲛ̅ⲛ̅‐ <text:line-break/><text:span text:style-name="T1"> </text:span><text:span text:style-name="T2">(116/32) </text:span> [ⲁ]ⲅ̣ⲅⲉⲗⲟⲥ ⲟⲩⲇⲉ ⲛⲁⲣⲭⲁⲅⲅⲉ‐ <text:line-break/><text:span text:style-name="T1"> </text:span><text:span text:style-name="T2">(117/1) </text:span> ⲗⲟⲥ ⲙ̅ⲛ̅ ⲛⲉⲑⲣⲟⲛⲟ[ⲥ] ⲛ̅ⲛⲉⲡ̅ⲛⲁ̅ <text:line-break/><text:span text:style-name="T1"> </text:span><text:span text:style-name="T2">(117/2) </text:span> ⲁⲩⲱ ⲙ̅ⲙ̅ⲛ̅ⲧ̅’̅ϫⲟⲉⲓⲥ ⲉⲧ’ϫⲟⲥⲉ <text:line-break/><text:span text:style-name="T1"> </text:span><text:span text:style-name="T2">(117/3) </text:span> ⲁⲩⲱ ⲡⲛⲟ[ϭ] ⲛ̅[ⲛ]ⲟⲩⲥ· ⲉⲕϣⲧ̅ⲙ̅ <text:line-break/><text:span text:style-name="T1"> </text:span><text:span text:style-name="T2">(117/4) </text:span> ⲥⲟⲩ[ⲱ]ⲛ̅ⲅ̅ [ⲟ]ⲩⲁ[ⲁⲧⲕ̅] ⲛ̅ⲅ̅ⲛⲁϣϭ̅ⲙ̅ϭⲟⲙ <text:line-break/><text:span text:style-name="T1"> </text:span><text:span text:style-name="T2">(117/5) </text:span> ⲁⲛ ⲛ̅ⲥⲟⲩⲱⲛ [ⲛ]ⲁⲓ̈ ⲧⲏⲣⲟⲩ· ⲟⲩⲱⲛ <text:line-break/><text:span text:style-name="T1"> </text:span><text:span text:style-name="T2">(117/6) </text:span> ⲛⲁⲕ ⲙ̅ⲡⲣⲟ ϫ[ⲉⲕ]ⲁⲁⲥ ⲉⲕⲛⲁⲥⲟⲩ‐ <text:line-break/><text:span text:style-name="T1"> </text:span><text:span text:style-name="T2">(117/7) </text:span> ⲱⲛ ⲡⲉⲧ’ϣⲟ[ⲟ]ⲡ̣· ⲧⲱϩ̅ⲙ̅ ⲉϩⲟⲩⲛ <text:line-break/><text:span text:style-name="T1"> </text:span><text:span text:style-name="T2">(117/8) </text:span> ⲉⲣⲟⲕ ⲟⲩⲁⲁⲕ ϫⲉⲕⲁⲁⲥ ⲉⲣⲉⲡⲗⲟ‐ <text:line-break/><text:soft-page-break/><text:span text:style-name="T1"> </text:span><text:span text:style-name="T2">(117/9) </text:span> ⲅⲟⲥ ⲛⲁⲟⲩⲱⲛ ⲛⲁⲕ· ⲛ̅ⲧⲟϥ ⲅⲁⲣ <text:line-break/><text:span text:style-name="T1"> </text:span><text:span text:style-name="T2">(117/10) </text:span> ⲡⲉ ⲡ̅ⲣ̅ⲣⲟ ⲛ̅ⲧⲡⲓⲥⲧⲓⲥ ⲙ̅ⲛ̅ ⲧⲥⲏ‐ <text:line-break/><text:span text:style-name="T1"> </text:span><text:span text:style-name="T2">(117/11) </text:span> ϥⲉ ⲉⲧ’ⲧⲏⲙ· ⲉⲁϥϣⲱⲡⲉ ⲙ̅ⲡⲧⲏ‐ <text:line-break/><text:span text:style-name="T1"> </text:span><text:span text:style-name="T2">(117/12) </text:span> ⲣ̅ϥ̅ ⲛ̅ⲟⲩⲟⲛ ⲛⲓⲙ· ⲉⲧⲃⲉ ϫⲉ ϥⲟⲩ‐ <text:line-break/><text:span text:style-name="T1"> </text:span><text:span text:style-name="T2">(117/13) </text:span> ⲱϣⲉ ⲛⲁ ⲛ̅ⲟⲩⲟⲛ ⲛⲓⲙ· ⲡⲁϣⲏ‐ <text:line-break/><text:span text:style-name="T1"> </text:span><text:span text:style-name="T2">(117/14) </text:span> ⲣⲉ ⲥ̅ⲃ̅ⲧⲱⲧ̅ⲕ̅ ⲉ{ⲉⲓ} ⲉⲃⲟⲗ ϩ̅ⲛ̅ ⲛ̅ⲕⲟⲥ‐ <text:line-break/><text:span text:style-name="T1"> </text:span><text:span text:style-name="T2">(117/15) </text:span> ⲙⲟⲕⲣⲁⲧⲱⲣ ⲛ̅ⲧⲉ ⲡⲕⲁⲕⲉ· ⲁⲩⲱ <text:line-break/><text:span text:style-name="T1"> </text:span><text:span text:style-name="T2">(117/16) </text:span> ⲡⲉⲓ̈ⲁⲏⲣ ⲛ̅ⲧⲉⲓ̈ϭⲟⲧ’ ⲉϥⲙⲉϩ ⲛ̅ⲇⲩ‐ <text:line-break/><text:span text:style-name="T1"> </text:span><text:span text:style-name="T2">(117/17) </text:span> ⲛⲁⲙⲓⲥ· ⲉϣⲱⲡⲉ ⲇⲉ ⲉⲩⲛ̅ⲧⲁⲕ ⲙ̅‐ <text:line-break/><text:span text:style-name="T1"> </text:span><text:span text:style-name="T2">(117/18) </text:span> ⲙⲁⲩ ⲙ̅ⲡⲉⲭ̅ⲥ̅ ⲕⲛⲁϫⲣⲟ ⲉⲡⲉⲓ̈ⲕⲟⲥ <text:line-break/><text:span text:style-name="T1"> </text:span><text:span text:style-name="T2">(117/19) </text:span> ⲙⲟⲥ ⲧⲏⲣ̅ϥ̅· ⲡⲉⲧ’ⲕⲛⲁⲟⲩⲱⲛ ⲙ̅‐ <text:line-break/><text:span text:style-name="T1"> </text:span><text:span text:style-name="T2">(117/20) </text:span> ⲙⲟϥ ⲛⲁⲕ ⲕⲛⲁⲟⲩⲱⲛ ⲙ̅ⲙⲟϥ· <text:line-break/><text:span text:style-name="T1"> </text:span><text:span text:style-name="T2">(117/21) </text:span> ⲡⲉⲧ’ⲕⲛⲁⲧⲱϩ̅ⲙ̅ ⲉⲣⲟϥ ⲛⲁⲕ ⲕⲛⲁ‐ <text:line-break/><text:span text:style-name="T1"> </text:span><text:span text:style-name="T2">(117/22) </text:span> ⲧⲱϩ̅ⲙ̅ ⲉⲕ̅ⲣ̅ⲱⲫⲉⲗⲉⲓ ⲙ̅ⲙⲟⲕ ⲟⲩ‐ <text:line-break/><text:span text:style-name="T1"> </text:span><text:span text:style-name="T2">(117/23) </text:span> ⲁⲁⲕ· ϩ̅ⲛ̅ ϩⲏⲟⲩ ⲙ̅ⲙⲟⲕ ⲡⲁϣⲏ‐ <text:line-break/><text:span text:style-name="T1"> </text:span><text:span text:style-name="T2">(117/24) </text:span> ⲣⲉ ⲉⲛⲕⲙⲟⲟϣⲉ ⲁⲛ ϩ̅ⲛ̅ ⲛⲉⲧⲉ‐ <text:line-break/><text:span text:style-name="T1"> </text:span><text:span text:style-name="T2">(117/25) </text:span> ⲙ̅ⲙ̅ⲛ̅ ϩⲏⲩ ⲛ̅ϩⲏⲧⲟⲩ· ⲡⲁϣⲏⲣⲉ <text:line-break/><text:span text:style-name="T1"> </text:span><text:span text:style-name="T2">(117/26) </text:span> ⲧⲟⲩⲃⲟⲕ ⲛ̅ϣⲟⲣ̅ⲡ̅ ⲉⲧ’ⲡⲟⲗⲓⲧⲓⲁ <text:line-break/><text:span text:style-name="T1"> </text:span><text:span text:style-name="T2">(117/27) </text:span> ⲉⲧ’ϩ̅ⲓ̅ⲃⲟⲗ· ϫⲉⲕⲁⲁⲥ ⲉⲕⲛⲁϣϭ̅ⲙ̅ <text:line-break/><text:span text:style-name="T1"> </text:span><text:span text:style-name="T2">(117/28) </text:span> ϭⲟⲙ ⲛ̅ⲧⲟⲩⲃⲉ ⲧⲁⲫⲟⲩⲛ· ⲁⲩⲱ <text:line-break/><text:span text:style-name="T1"> </text:span><text:span text:style-name="T2">(117/29) </text:span> ⲙ̅ⲡ̅ⲣ̅ϣⲱⲡⲉ ⲉⲕⲟ ⲛ̅ⲛⲉϣⲱⲧ’ <text:line-break/><text:span text:style-name="T1"> </text:span><text:span text:style-name="T2">(117/30) </text:span> ⲙ̅ⲡϣⲁϫⲉ ⲙ̅ⲡⲛⲟⲩⲧⲉ· ⲁⲣⲓⲇⲟ‐ <text:line-break/><text:span text:style-name="T1"> </text:span><text:span text:style-name="T2">(117/31) </text:span> ϭⲓⲙⲁⲍⲉ ⲛ̅ϣⲟⲣ̅ⲡ̅ ⲛ̅ϣⲁϫⲉ ⲛⲓⲙ <text:line-break/><text:span text:style-name="T1"> </text:span><text:span text:style-name="T2">(117/32) </text:span> ϩⲁⲑⲏ ⲉⲙ[ⲡⲁ]ⲧⲉⲕⲛⲟϫⲟⲩ ⲉⲃⲟⲗ <text:line-break/><text:span text:style-name="T1"> </text:span><text:span text:style-name="T2">(117/33) </text:span> ⲙ̅ⲡ̅ⲣ̅ⲟⲩⲱ̣ϣ ⲉϫⲡⲉ ⲛⲓⲉⲟⲟⲩ ⲉ‐ <text:line-break/><text:span text:style-name="T1"> </text:span><text:span text:style-name="T2">(117/34) </text:span> ⲧⲉ ⲛ̅ⲥⲉⲧⲁϫⲣⲏⲩ ⲁⲛ· ⲟⲩⲧⲉ <text:line-break/><text:span text:style-name="T1"> </text:span><text:span text:style-name="T2">(118/1) </text:span> ⲧⲙⲛⲧ’ⲃⲁⲃ̣[ⲉ] ⲣⲱⲙⲉ ⲧⲁⲓ̈ ⲉⲧ’ⲉⲓ‐ <text:line-break/><text:span text:style-name="T1"> </text:span><text:span text:style-name="T2">(118/2) </text:span> ⲛⲉ ⲙ̅ⲙⲟⲕ ⲉⲡⲧⲁ̣ⲕⲟ· ϫⲓ ⲉⲣⲟⲕ <text:line-break/><text:span text:style-name="T1"> </text:span><text:span text:style-name="T2">(118/3) </text:span> ⲛ̅ⲧⲥⲟⲫⲓⲁ ⲙ̅ⲡⲉⲭ̅ⲥ̅ ⲛ̣̅[ϩ]ⲁⲣ̅ϣ̅ϩⲏⲧ’ <text:line-break/><text:span text:style-name="T1"> </text:span><text:span text:style-name="T2">(118/4) </text:span> ⲁⲩⲱ ⲛ̅ⲣⲙⲣⲁ[ϣ] ⲁⲩⲱ ⲛⲅ̣̅ϩⲁⲣⲉϩ <text:line-break/><text:span text:style-name="T1"> </text:span><text:span text:style-name="T2">(118/5) </text:span> ⲉⲧⲁⲓ̈ ⲱ͂ ⲡⲁϣⲏ[ⲣ]ⲉ̣· ⲉⲕⲥⲟⲟⲩⲛ <text:line-break/><text:span text:style-name="T1"> </text:span><text:span text:style-name="T2">(118/6) </text:span> ϫⲉ ⲟⲩϩⲏⲟⲩ ⲛ̅ⲟ[ⲩ]ⲟ̣ⲉⲓϣ ⲛⲓⲙ ⲧⲉ <text:line-break/><text:span text:style-name="T1"> </text:span><text:span text:style-name="T2">(118/7) </text:span> ⲧⲉϩ̅ⲓ̅ⲏ ⲙ̅ⲡⲛⲟⲩ[ⲧ]ⲉ·ʹ26 <text:line-break/><text:span text:style-name="T1"> </text:span><text:span text:style-name="T2">(118/8) </text:span> ʹ26ⲓ̈ⲭⲑⲩⲥ ⲑⲁⲩⲙⲁ ⲏⲏⲏ <text:line-break/><text:span text:style-name="T1"> </text:span><text:span text:style-name="T2">(118/9) </text:span> ⲁⲙⲏⲭⲁⲛⲟⲛ ⲧⲩ </text:p>
      <text:p text:style-name="P6"/>
      <text:p text:style-name="P4">( codex VII ) The Three Steles of Seth</text:p>
      <text:p text:style-name="P5"><text:span text:style-name="T1"> </text:span><text:span text:style-name="T2">(1/1) </text:span> [......]ⲉ ⲛⲧⲉ ⲡⲉ.[...] ⲛ ⲛⲓϣⲁϫⲉ <text:line-break/><text:span text:style-name="T1"> </text:span><text:span text:style-name="T2">(1/2) </text:span> [......]ⲟⲛϩ ϣⲁ ⲉⲛ̣[ⲉϩ] ⲛ̣ⲁⲓ̈ ⲁⲛⲟⲕ <text:line-break/><text:span text:style-name="T1"> </text:span><text:span text:style-name="T2">(1/3) </text:span> [.............]ⲩ ⲍⲱⲥ̣[ⲧⲣⲓⲁⲛ]‐ <text:line-break/><text:span text:style-name="T1"> </text:span><text:span text:style-name="T2">(1/4) </text:span> [ⲟⲥ .]..[....].ⲥ̅.[..]ⲓ̅ⲁ̅ ⲙⲛ ⲓ̅̈̅ⲟ̅ⲗ̅ⲁ̅ⲟ̅ⲥ̅ <text:line-break/><text:span text:style-name="T1"> </text:span><text:span text:style-name="T2">(1/5) </text:span> [ⲉⲧ]ⲁ̣ⲓ̣̈ϣⲱⲡⲉ ϩⲙ ⲡ[ⲓⲕ]ⲟⲥⲙⲟⲥ ⲛ ⲛⲁⲓ̈ <text:line-break/><text:span text:style-name="T1"> </text:span><text:span text:style-name="T2">(1/6) </text:span> [ⲉⲧ]ⲉ ⲛ ⲧⲁϭⲟⲧ’ ⲙⲛ [ⲛⲏ] ⲉⲧ’ⲙⲛⲛⲥⲱⲉⲓ <text:line-break/><text:span text:style-name="T1"> </text:span><text:span text:style-name="T2">(1/7) </text:span> [ⲛⲓ]ⲥ̣ⲱⲧⲡ’ ⲉⲧⲟⲛϩ· ϥⲟ̣ⲛϩ ⲛϭⲓ ⲡⲛⲟⲩⲧⲉ <text:line-break/><text:span text:style-name="T1"> </text:span><text:span text:style-name="T2">(1/8) </text:span> [....] ⲧⲙⲉ ϩⲛ ⲟⲩⲙⲛⲧⲙⲉ ⲛ ⲧⲁⲡⲙⲉ <text:line-break/><text:span text:style-name="T1"> </text:span><text:span text:style-name="T2">(1/9) </text:span> [ⲙⲛ ⲟ]ⲩⲥⲟⲟⲩⲛ ⲁⲛⲟⲕ ⲙⲛ 〈ⲟⲩ〉ⲟⲩⲟⲉⲓⲛ ϣⲁ <text:line-break/><text:span text:style-name="T1"> </text:span><text:span text:style-name="T2">(1/10) </text:span> [ⲉⲛ]ⲉϩ· ⲉⲧⲁⲉⲓⲡⲱⲣϫ ⲙ ⲡⲓⲥⲱⲙⲁⲧⲓ <text:line-break/><text:span text:style-name="T1"> </text:span><text:span text:style-name="T2">(1/11) </text:span> [ⲕ]ⲟⲛ ⲛ ⲕⲁⲕⲉ ⲉⲧⲛϩⲣⲁⲓ̈ ⲛϩⲏⲧ’· ⲙⲛ ⲡⲓ‐ <text:line-break/><text:span text:style-name="T1"> </text:span><text:span text:style-name="T2">(1/12) </text:span> [ⲯ]ⲩⲭⲓⲕⲟⲛ ⲛ ⲭⲁⲟⲩⲥ ϩⲛ ⲟⲩⲛⲟⲩⲥ <text:line-break/><text:span text:style-name="T1"> </text:span><text:span text:style-name="T2">(1/13) </text:span> ⲙ̣ⲛ ϯⲙⲛⲧ’ⲥϩⲓⲙⲉ ⲛⲛ ⲉⲡⲓⲑⲩⲙⲓⲁ <text:line-break/><text:span text:style-name="T1"> </text:span><text:span text:style-name="T2">(1/14) </text:span> [.]ⲁⲓ̈ ⲉⲧ’ϩⲛ ⲡⲓⲕⲁⲕⲉ· ⲉⲙⲡⲓⲣ ϩⲱⲃ ϭⲉ <text:line-break/><text:span text:style-name="T1"> </text:span><text:span text:style-name="T2">(1/15) </text:span> ⲉⲣⲟⲥ· ⲉⲧⲁ̣ⲉⲓϭⲓⲛⲉ ⲙ ⲡⲓⲁⲧⲛ ⲁⲣⲏϫϥ <text:line-break/><text:span text:style-name="T1"> </text:span><text:span text:style-name="T2">(1/16) </text:span> ⲛ̣ⲧⲉ ⲧⲁϩⲩⲗⲏ· ⲁⲩⲱ ⲁⲉⲓⲥⲟϩⲉ ⲛ ϯ‐ <text:line-break/><text:span text:style-name="T1"> </text:span><text:span text:style-name="T2">(1/17) </text:span> [ⲕⲧ]ⲓⲥⲓⲥ ⲉⲧ’ⲙⲟⲟⲩⲧ’ ⲉⲧ’ϩⲣⲁⲓ̈ ⲛϩⲏⲧ’ <text:line-break/><text:span text:style-name="T1"> </text:span><text:span text:style-name="T2">(1/18) </text:span> [ⲙ]ⲛ ⲡⲓⲕⲟⲥⲙⲟⲕⲣⲁⲧⲱⲣ ⲛ ⲛⲟⲩⲧⲉ <text:line-break/><text:span text:style-name="T1"> </text:span><text:span text:style-name="T2">(1/19) </text:span> ⲛⲛ ⲉⲥⲑⲏⲧⲟⲛ· ⲉⲁⲉ̣[ⲓ]ϯ ϩⲛ ⲟⲩϭⲟⲙ <text:line-break/><text:span text:style-name="T1"> </text:span><text:span text:style-name="T2">(1/20) </text:span> ⲛⲛ ⲟⲩ̣ⲟ̣ⲉⲓϣ ⲛⲧⲉ ⲡⲧⲏⲣϥ ⲛ ⲛⲏ ⲉ‐ <text:line-break/><text:span text:style-name="T1"> </text:span><text:span text:style-name="T2">(1/21) </text:span> ⲧⲛⲧⲁ̣[ⲩ] ⲙⲙⲁⲩ ⲙ ⲙⲉⲣⲓⲕⲟⲛ ⲛ ϣⲙ‐ <text:line-break/><text:span text:style-name="T1"> </text:span><text:span text:style-name="T2">(1/22) </text:span> ⲙⲟ· ⲉⲉⲓ̈ϩⲓ ⲧⲟⲟⲧ’ ⲉ ⲛⲉⲩϩⲃⲏⲩⲉ ⲛ <text:line-break/><text:span text:style-name="T1"> </text:span><text:span text:style-name="T2">(1/23) </text:span> ⲛⲁⲩ ⲟⲩⲕⲟⲩⲉⲓ· ⲙ ⲡⲣⲏⲧⲉ ⲉⲧⲁ‐ <text:line-break/><text:span text:style-name="T1"> </text:span><text:span text:style-name="T2">(1/24) </text:span> ϯⲁⲛⲁⲅⲕⲏ ⲛⲧⲉ ⲡⲓϫⲡⲟ ⲛ̣ⲧ’ ⲉ ⲡⲉ‐ <text:line-break/><text:span text:style-name="T1"> </text:span><text:span text:style-name="T2">(1/25) </text:span> ⲧⲟⲩⲟⲛϩ· ⲉⲙⲡⲓⲱ̣ⲕ ϩⲧⲏⲟⲩ ⲣⲱ <text:line-break/><text:span text:style-name="T1"> </text:span><text:span text:style-name="T2">(1/26) </text:span> ⲉⲛⲉϩ· ⲁⲗⲗⲁ ⲛ ⲟⲩⲟⲉⲓϣ ⲛⲓⲙ <text:line-break/><text:span text:style-name="T1"> </text:span><text:span text:style-name="T2">(1/27) </text:span> ⲛⲉⲓ̈ⲡⲱⲣϫ ⲙⲙⲟⲓ̈ ⲛⲥⲁⲃⲟⲗ ⲙⲙⲟⲟⲩ <text:line-break/><text:span text:style-name="T1"> </text:span><text:span text:style-name="T2">(1/28) </text:span> ⲉ̣ⲓ̣̈ϣ̣ⲱⲡⲉ ⲉⲃⲟⲗ ϩⲓⲧⲟⲟⲧϥ ⲛ ⲟⲩ‐ <text:line-break/><text:span text:style-name="T1"> </text:span><text:span text:style-name="T2">(1/29) </text:span> [..]ⲥ̣ⲉ ⲉϥⲟⲩⲁⲁⲃ· ⲁⲩⲱ ⲉϥⲙⲟϫϭ <text:line-break/><text:span text:style-name="T1"> </text:span><text:span text:style-name="T2">(1/30) </text:span> [ⲉ]ⲧⲁⲓ̈ⲥⲟⲟⲩⲧⲛ ⲛ ⲧⲁⲯⲩⲭⲏ ⲛⲛ ⲁⲧ’‐ <text:line-break/><text:span text:style-name="T1"> </text:span><text:span text:style-name="T2">(1/31) </text:span> ⲕⲁϭⲓⲁ ⲉⲃⲟⲗ· ⲁⲩⲱ ⲁⲉⲓϯ ϭⲟⲙ <text:line-break/><text:span text:style-name="T1"> </text:span><text:span text:style-name="T2">(2/1) </text:span> ⲙ ⲡⲓⲛⲟⲉⲣ[ⲟⲛ <text:line-break/><text:span text:style-name="T1"> </text:span><text:span text:style-name="T2">(2/2) </text:span> ⲁⲩⲱ ⲁⲉⲓ̣[ <text:line-break/><text:span text:style-name="T1"> </text:span><text:span text:style-name="T2">(2/3) </text:span> ϩⲙ ⲡⲓⲛⲕ̣[...] ⲛ ⲕ[.]..[ <text:line-break/><text:span text:style-name="T1"> </text:span><text:span text:style-name="T2">(2/4) </text:span> ⲙ ⲡ̣ⲁⲛⲟⲩⲧ[ⲉ <text:line-break/><text:span text:style-name="T1"> </text:span><text:span text:style-name="T2">(2/5) </text:span> [...] ⲉⲁⲉⲓⲣ ϩ[....] ⲡ[...]ⲁ̣ⲛⲧ̣[...... <text:line-break/><text:span text:style-name="T1"> </text:span><text:span text:style-name="T2">(2/6) </text:span> ϭⲙϭⲟⲙ ϩⲛ [ⲟ]ⲩ̣ⲡ̅ⲛ̅ⲁ̅ ⲉϥ̣ⲟ̣ⲩⲁⲁ[ⲃ· ⲡⲏ] <text:line-break/><text:span text:style-name="T1"> </text:span><text:span text:style-name="T2">(2/7) </text:span> ⲉⲧ’ϫⲟⲥⲉ [ⲉ ⲛⲟ]ⲩⲧⲉ· ⲁⲩⲱ ⲁ[ϥ.... <text:line-break/><text:span text:style-name="T1"> </text:span><text:span text:style-name="T2">(2/8) </text:span> ϩⲓϫⲱⲉⲓ ⲙⲁⲩ̣ⲁⲁⲧ’ ⲉⲉⲓⲥⲟⲩⲧⲱ̣[ⲛ ⲁⲩⲱ] <text:line-break/><text:span text:style-name="T1"> </text:span><text:span text:style-name="T2">(2/9) </text:span> ⲁⲉⲓⲛⲁⲩ ⲉ ⲡⲓⲧⲉⲗⲓⲟⲥ ⲛ ⲁⲗⲟ[ⲩ...... <text:line-break/><text:span text:style-name="T1"> </text:span><text:span text:style-name="T2">(2/10) </text:span> ⲡⲉ ⲛⲧⲟϥ· ⲁⲩⲱ ⲙⲛ ⲡⲏ ⲉⲧ.[...ⲛ ⲟⲩ]‐ <text:line-break/><text:span text:style-name="T1"> </text:span><text:span text:style-name="T2">(2/11) </text:span> ⲙⲏⲏϣⲉ ⲛ ⲥⲟⲡ’ ⲙⲛ ⲟⲩⲁⲧⲟ ⲛ ⲣ[ⲏⲧⲉ ⲉⲩ]‐ <text:line-break/><text:span text:style-name="T1"> </text:span><text:span text:style-name="T2">(2/12) </text:span> ⲟⲩⲟⲛϩ ⲛⲁⲓ̈ ⲉⲃⲟⲗ· ⲙ ⲡⲉⲓ̈ⲣⲏⲧⲉ ⲟ̣[ⲩⲉⲓ]‐ <text:line-break/><text:span text:style-name="T1"> </text:span><text:span text:style-name="T2">(2/13) </text:span> ⲱⲧ’ ⲉϥⲟⲩⲱϣ· ⲉⲉⲓⲕⲱⲧⲉ ⲛⲥⲁ ⲡ[ⲓϩⲟ]‐ <text:line-break/><text:span text:style-name="T1"> </text:span><text:span text:style-name="T2">(2/14) </text:span> ⲟⲩⲧ’ ⲛ ⲉⲓⲱⲧ’ ⲛⲧⲉ ⲛⲁⲓ̈ ⲧⲏⲣⲟⲩ [ⲛⲏ ⲉⲧ’]‐ <text:line-break/><text:span text:style-name="T1"> </text:span><text:span text:style-name="T2">(2/15) </text:span> ϩⲛ ⲟⲩⲉⲛⲛⲟⲓⲁ ⲙⲛ ⲟⲩⲉⲥⲑⲏⲥⲓⲥ ϩ̣[ⲛ ⲟⲩ]‐ <text:line-break/><text:span text:style-name="T1"> </text:span><text:span text:style-name="T2">(2/16) </text:span> ⲉⲓⲇⲟⲥ ⲁⲩⲱ ⲟⲩⲅⲉⲛⲟⲥ ⲙⲛ ⲟⲩ[ⲙⲉ]‐ <text:line-break/><text:soft-page-break/><text:span text:style-name="T1"> </text:span><text:span text:style-name="T2">(2/17) </text:span> ⲣⲟⲥ ⲁⲩⲱ ⲟⲩⲡⲧⲏⲣϥ ⲙⲛ ⲡⲏ ⲉ[ⲧⲁ]‐ <text:line-break/><text:span text:style-name="T1"> </text:span><text:span text:style-name="T2">(2/18) </text:span> ⲙⲁϩⲧⲉ ⲁⲩⲱ ⲉⲧⲟⲩⲁⲙⲁϩⲧⲉ ⲙⲙ[ⲟϥ] <text:line-break/><text:span text:style-name="T1"> </text:span><text:span text:style-name="T2">(2/19) </text:span> ⲙⲛ ⲟⲩⲥⲱⲙⲁ ⲁⲩⲱ ⲟⲩⲁⲧⲥⲱ̣[ⲙⲁ] <text:line-break/><text:span text:style-name="T1"> </text:span><text:span text:style-name="T2">(2/20) </text:span> ⲙⲛ ⲟⲩⲟⲩⲥⲓⲁ ⲁⲩⲱ ⲟⲩϩⲩⲗⲏ ⲙ[ⲛ ⲛⲉⲧ]‐ <text:line-break/><text:span text:style-name="T1"> </text:span><text:span text:style-name="T2">(2/21) </text:span> ⲛⲧⲉⲩ ⲧⲏⲣⲟⲩ· ⲁⲩⲱ ϯϩⲩⲡⲁⲣⲝⲓⲥ̣ [ⲉⲥ] <text:line-break/><text:span text:style-name="T1"> </text:span><text:span text:style-name="T2">(2/22) </text:span> ⲙⲟϫⲕ ⲛⲙⲙⲁⲩ ⲙⲛ ⲡⲛⲟⲩⲧⲉ ⲛⲧⲉ <text:line-break/><text:span text:style-name="T1"> </text:span><text:span text:style-name="T2">(2/23) </text:span> {ⲡⲉⲓ̈}ⲡⲓⲕ̅ⲗ̅ⲥ̣̅̅ ⲛ̅ⲛ ⲁⲧⲙⲓⲥⲉ ⲙ̣ⲛ ϯϭⲟⲙ [ⲉⲧⲛ]‐ <text:line-break/><text:span text:style-name="T1"> </text:span><text:span text:style-name="T2">(2/24) </text:span> ⲧⲟⲟⲧⲟⲩ ⲧⲏⲣⲟⲩ· ⲁⲩⲱ ϯϩ̣ⲩⲡⲁⲣⲝⲓ[ⲥ] <text:line-break/><text:span text:style-name="T1"> </text:span><text:span text:style-name="T2">(2/25) </text:span> ϫⲉ ⲡⲱⲥ ⲛⲉⲧ’ϣⲟⲟⲡ’ ⲉϩⲉⲛⲉⲃⲟⲗ ϩⲙ <text:line-break/><text:span text:style-name="T1"> </text:span><text:span text:style-name="T2">(2/26) </text:span> ⲡⲉⲱⲛ ⲛⲧⲉ ⲛⲉⲧ’ϣⲟⲟⲡ ⲛⲉ ⲉⲃⲟⲗ <text:line-break/><text:span text:style-name="T1"> </text:span><text:span text:style-name="T2">(2/27) </text:span> ϩⲛ ⲟⲩⲡ̅ⲛ̅ⲁ̅ ⲛ̅ⲛ ⲁⲧⲛⲁⲩ ⲉⲣⲟϥ ⲁⲩⲱ ⲛⲛ ⲁ[ⲧ’]‐ <text:line-break/><text:span text:style-name="T1"> </text:span><text:span text:style-name="T2">(2/28) </text:span> ⲡⲱϣⲉ ⲛⲛ ⲁⲩⲧⲟⲅⲉⲛⲏⲥ ⲉϩⲉⲛⲅ̅ ⲛ [ⲉⲓ]‐ <text:line-break/><text:span text:style-name="T1"> </text:span><text:span text:style-name="T2">(2/29) </text:span> ⲛⲉ ⲛⲛ ⲁⲧ’ⲙ[ⲓ]ⲥ̣ⲉ ⲉⲩⲛⲧⲁⲩ ⲙⲙⲁⲩ <text:line-break/><text:span text:style-name="T1"> </text:span><text:span text:style-name="T2">(2/30) </text:span> ⲛⲛ ⲟⲩⲁⲣⲭⲏ ⲉⲥⲥⲟⲧⲡ’ ⲉ ⲧ’ϩⲩⲡⲁⲣⲝ[ⲓⲥ] <text:line-break/><text:span text:style-name="T1"> </text:span><text:span text:style-name="T2">(2/31) </text:span> ⲁⲩⲱ ⲉⲩⲣ ϣⲟⲣⲡ’ ⲛ ϣⲟⲟⲡ̣ [ⲉ ⲛⲁⲓ̈ ⲧⲏ]‐ <text:line-break/><text:span text:style-name="T1"> </text:span><text:span text:style-name="T2">(2/32) </text:span> ⲣⲟⲩ· ⲉⲁⲩϣⲱⲡⲉ ⲇⲉ ⲙ ⲡⲓⲕ̣[ⲟⲥⲙⲟⲥ] <text:line-break/><text:span text:style-name="T1"> </text:span><text:span text:style-name="T2">(2/33) </text:span> ⲏ%0 ⲡⲱⲥ ⲛⲏ ⲉⲧⲟⲩⲃⲏϥ ⲙⲛ ⲛⲁⲓ̈ ⲧⲏ[ⲣⲟⲩ] <text:line-break/><text:span text:style-name="T1"> </text:span><text:span text:style-name="T2">(3/1) </text:span> [............ⲛⲁ]ⲛ̣ⲟⲩϥ· ⲡⲁⲓ̈ <text:line-break/><text:span text:style-name="T1"> </text:span><text:span text:style-name="T2">(3/2) </text:span> [.........]ⲁ[......] ⲁ̣ⲩⲱ ⲛⲗⲟⲉⲓ‐ <text:line-break/><text:span text:style-name="T1"> </text:span><text:span text:style-name="T2">(3/3) </text:span> [ϭⲉ ⲁ]ⲩ̣ⲱ ϫⲉ ⲁϣ̣ [ⲡⲉ ⲡⲧ]ⲟⲡⲟⲥ ⲛ[ⲧ]ⲉ <text:line-break/><text:span text:style-name="T1"> </text:span><text:span text:style-name="T2">(3/4) </text:span> [ⲡⲏ ⲉ]ⲧ̣ⲙⲙⲁⲩ· ⲏ%0 ⲟⲩ ⲛ ⲁⲣⲭⲏ ⲉⲧⲛⲧⲁϥ <text:line-break/><text:span text:style-name="T1"> </text:span><text:span text:style-name="T2">(3/5) </text:span> [ⲙⲙⲁ]ⲩ· ⲏ ⲛ ⲁϣ ⲛ ⲣⲏⲧⲉ ⲡⲓⲉⲃⲟⲗ ⲙⲙⲟϥ <text:line-break/><text:span text:style-name="T1"> </text:span><text:span text:style-name="T2">(3/6) </text:span> [ⲉϥ]ϣⲟⲟⲡ’ ⲛⲁϥ ⲙⲛ [ⲛⲁⲓ̈] ⲧⲏⲣⲟⲩ· ⲏ%0 ⲡⲱⲥ‐ <text:line-break/><text:span text:style-name="T1"> </text:span><text:span text:style-name="T2">(3/7) </text:span> [ⲉϥϣⲱ]ⲡⲉ ⲛ ϩⲁⲡⲗⲟⲩⲛ ⲉϥϣⲉⲃⲓⲏⲟⲩⲧ’ <text:line-break/><text:span text:style-name="T1"> </text:span><text:span text:style-name="T2">(3/8) </text:span> [ⲉⲣⲟϥ] ⲙ̣ⲁⲩⲁⲁϥ· ⲉϥϣⲟⲟⲡ’ ⲛ ⲟⲩϩⲩ‐ <text:line-break/><text:span text:style-name="T1"> </text:span><text:span text:style-name="T2">(3/9) </text:span> [ⲡⲁ]ⲣ̣ⲝ̣ⲓⲥ ⲙⲛ ⲟⲩⲉⲓⲇⲟⲥ· ⲁⲩⲱ ⲟⲩⲙⲛⲧ’‐ <text:line-break/><text:span text:style-name="T1"> </text:span><text:span text:style-name="T2">(3/10) </text:span> [ⲙ]ⲁ̣ⲕⲁⲣⲓⲟⲥ· ⲁⲩⲱ ⲉϥϯ ⲛ ⲟⲩϭⲟⲙ ⲉϥ‐ <text:line-break/><text:span text:style-name="T1"> </text:span><text:span text:style-name="T2">(3/11) </text:span> [ⲟ]ⲛϩ ϩⲙ ⲡⲱⲛϩ· ⲏ%0 ⲛ ⲁϣ ⲛ ⲣⲏⲧⲉ ϯϩⲩ‐ <text:line-break/><text:span text:style-name="T1"> </text:span><text:span text:style-name="T2">(3/12) </text:span> [ⲡ]ⲁⲣⲝⲓⲥ ⲉⲧⲉ ⲛⲥϣⲟⲟⲡ’ ⲁⲛ ⲁⲥⲟⲩ‐ <text:line-break/><text:span text:style-name="T1"> </text:span><text:span text:style-name="T2">(3/13) </text:span> ⲱⲛϩ ⲉⲃⲟⲗ ϩⲛ ⲟⲩϭⲟⲙ ⲉⲥϣⲟⲟⲡ’· <text:line-break/><text:span text:style-name="T1"> </text:span><text:span text:style-name="T2">(3/14) </text:span> [ⲛ]ⲁ̣ⲓ̈ ⲇⲉ ⲉⲉⲓϣⲟϫⲛⲉ ⲉ ⲉⲓⲙⲉ ⲉⲣⲟ[ⲟ]ⲩ· <text:line-break/><text:span text:style-name="T1"> </text:span><text:span text:style-name="T2">(3/15) </text:span> [ⲁ]ⲩⲱ ⲛⲉⲓ̈ⲉ[ⲓ]ⲛⲉ ⲉϩⲣⲁⲓ̈ ⲙ ⲙⲏⲛⲉ ⲕⲁⲧⲁ <text:line-break/><text:span text:style-name="T1"> </text:span><text:span text:style-name="T2">(3/16) </text:span> ⲡ̣ⲧⲱⲡ’ ⲛⲧⲉ ⲡⲁⲅⲉⲛⲟⲥ ⲙ ⲡⲛⲟⲩⲧⲉ <text:line-break/><text:span text:style-name="T1"> </text:span><text:span text:style-name="T2">(3/17) </text:span> [ⲛ]ⲧ̣ⲉ ⲛⲁⲉⲓⲟⲧⲉ· ⲛⲉⲓ̈ϫⲱ ⲙ ⲡⲥⲙⲟⲩ ⲛ‐ <text:line-break/><text:span text:style-name="T1"> </text:span><text:span text:style-name="T2">(3/18) </text:span> [ⲧ]ⲉ ⲛⲁⲓ̈ ⲧⲏⲣⲟⲩ· ⲛⲁϣⲟⲣⲡ’ ⲛ ⲉⲓⲟⲧⲉ <text:line-break/><text:span text:style-name="T1"> </text:span><text:span text:style-name="T2">(3/19) </text:span> [ⲅ]ⲁⲣ ⲙⲛ ⲛⲁⲉⲓⲟⲧⲉ ⲉⲧⲁⲩⲕⲱⲧⲉ ⲁⲩϭⲓⲛⲉ <text:line-break/><text:span text:style-name="T1"> </text:span><text:span text:style-name="T2">(3/20) </text:span> ⲁⲛⲟⲕ ⲇⲉ ⲙⲡⲓⲕⲁ ⲧⲟⲟⲧ’ ⲉⲃⲟⲗ ⲉⲉⲓⲣ ⲁⲓⲧⲓ <text:line-break/><text:span text:style-name="T1"> </text:span><text:span text:style-name="T2">(3/21) </text:span> ⲛⲥⲁ ⲟ[ⲩ]ⲙⲁ ⲛ ⲙⲧⲟⲛ ⲉϥⲙⲡϣⲁ ⲙ ⲡⲁⲡ̅ⲛ̅ⲁ̅· <text:line-break/><text:span text:style-name="T1"> </text:span><text:span text:style-name="T2">(3/22) </text:span> ⲉⲙⲡ[ⲁ]ⲧ̣ⲟⲩⲥⲟⲛϩⲧ’ ϩⲙ ⲡⲓⲉⲥⲑⲏⲧⲟⲛ <text:line-break/><text:span text:style-name="T1"> </text:span><text:span text:style-name="T2">(3/23) </text:span> ⲛ ⲕⲟⲥⲙⲟⲥ· ⲁⲩⲱ ⲧⲟⲧⲉ ⲉⲓ̈ⲙⲟⲕϩ ⲛ ϩⲏⲧ’ <text:line-break/><text:span text:style-name="T1"> </text:span><text:span text:style-name="T2">(3/24) </text:span> ⲉⲙⲁⲧⲉ ⲁⲩⲱ ⲉⲉⲓⲟ̣ⲕⲙ ⲉⲧⲃⲉ ϯⲙⲛⲧ’‐ <text:line-break/><text:span text:style-name="T1"> </text:span><text:span text:style-name="T2">(3/25) </text:span> ⲕⲟⲩⲉ[ⲓ] ⲛ ϩⲏⲧ’ ⲉⲧ’ⲕⲱⲧⲉ ⲉⲣ̣ⲟ̣ⲉⲓ· ⲁⲉⲓⲣ <text:line-break/><text:span text:style-name="T1"> </text:span><text:span text:style-name="T2">(3/26) </text:span> ⲧⲟⲗⲙⲁ ⲉ ⲉⲓⲣⲉ ⲛ ⲟⲩ[ⲗ]ⲁⲁⲩ ⲁⲩⲱ ⲉ ⲧⲁ‐ <text:line-break/><text:span text:style-name="T1"> </text:span><text:span text:style-name="T2">(3/27) </text:span> ⲁⲧ’ ⲛ ⲛⲓⲑⲏⲣⲓⲟⲛ ⲛ̣[ⲧ]ⲉ ⲧ̣ⲉⲣⲏⲙⲟⲥ· <text:line-break/><text:span text:style-name="T1"> </text:span><text:span text:style-name="T2">(3/28) </text:span> ⲉϩⲣⲁⲓ̈ ⲉⲩⲧⲁⲕⲟ ⲉϥⲛⲁϣⲧ’· ⲁϥⲁϩⲉⲣⲁⲧϥ <text:line-break/><text:span text:style-name="T1"> </text:span><text:span text:style-name="T2">(3/29) </text:span> ⲛⲁⲓ̈ [ⲛ]ϭⲓ ⲡⲁⲅⲅⲉⲗⲟⲥ ⲛⲧⲉ ϯⲅⲛⲱⲥⲓⲥ ⲛⲧⲉ <text:line-break/><text:span text:style-name="T1"> </text:span><text:span text:style-name="T2">(3/30) </text:span> [ⲡⲓⲟⲩⲟ]ⲉ̣ⲓⲛ ϣⲁ ⲉⲛⲉϩ· ⲁⲩⲱ ⲡⲉϫⲁϥ ⲛⲁⲓ̈ <text:line-break/><text:soft-page-break/><text:span text:style-name="T1"> </text:span><text:span text:style-name="T2">(3/31) </text:span> [ϫⲉ] ⲍ̅ⲱ̅ⲥ̅ⲧ̅ⲣ̅ⲓ̅ⲁ̅ⲛ̅ⲉ̅· ⲉⲧⲃⲉ ⲟⲩ ⲁⲕⲗⲓⲃⲉ ⲙ <text:line-break/><text:span text:style-name="T1"> </text:span><text:span text:style-name="T2">(3/32) </text:span> [ⲡⲓ]ⲣⲏⲧⲉ· ⲉⲕⲉ ⲛⲛ ⲁⲧⲙⲙⲉ ⲉ ⲛⲓⲛⲁϭ ⲛ ϣⲁ ⲉⲛⲉϩ <text:line-break/><text:span text:style-name="T1"> </text:span><text:span text:style-name="T2">(4/1) </text:span> ⲉⲧ’ⲥⲁϩⲣⲁ[ⲓ̈ <text:line-break/><text:span text:style-name="T1"> </text:span><text:span text:style-name="T2">(4/2) </text:span> ⲉⲣⲟⲕ ⲁⲛ[ <text:line-break/><text:span text:style-name="T1"> </text:span><text:span text:style-name="T2">(4/3) </text:span> ⲁⲩⲱ ⲉⲧⲃ[ⲉ ....]ⲧ̣ⲁⲩⲟⲕⲉⲡ[..... <text:line-break/><text:span text:style-name="T1"> </text:span><text:span text:style-name="T2">(4/4) </text:span> ⲁ[.] ϫⲉ ⲉⲕⲉⲛ[ⲟ]ⲩ[ϩ]ⲙ̣ ⲧⲉⲛⲟⲩ· ⲙ[.... <text:line-break/><text:span text:style-name="T1"> </text:span><text:span text:style-name="T2">(4/5) </text:span> ⲡⲉ ⲣⲱ ϩⲛ ⲧⲁⲕⲟ ⲉⲛⲉϩ· ⲟⲩⲇⲉ [..... <text:line-break/><text:span text:style-name="T1"> </text:span><text:span text:style-name="T2">(4/6) </text:span> ⲙⲉ ⲉ ⲛⲏ ⲉⲧⲕⲥⲟⲟⲩⲛ ⲙⲙⲟⲟⲩ̣ [ϩⲓⲛⲁ] <text:line-break/><text:span text:style-name="T1"> </text:span><text:span text:style-name="T2">(4/7) </text:span> ϫⲉ ⲉⲕⲉⲛⲟⲩ[ϩ]ⲙ̣ ⲛ ϩⲉⲛⲕⲟⲟⲩⲉ· ⲛ̣[ⲏ ⲉⲧⲉ]‐ <text:line-break/><text:span text:style-name="T1"> </text:span><text:span text:style-name="T2">(4/8) </text:span> ⲡⲓⲱⲧ’ ⲛⲧ[ⲉ] ⲛⲓϫⲓⲥⲉ ⲛⲁⲥⲟⲧⲡⲟ̣[ⲩ ⲕⲙⲉ]‐ <text:line-break/><text:span text:style-name="T1"> </text:span><text:span text:style-name="T2">(4/9) </text:span> ⲉⲩⲉ ⲟⲛ ϫⲉ ⲛⲧⲕ ⲡⲓⲱⲧ’ ⲛⲧⲉ ⲡ[ⲉⲕⲅⲉⲛⲟⲥ] <text:line-break/><text:span text:style-name="T1"> </text:span><text:span text:style-name="T2">(4/10) </text:span> ⲏ%0 ϫⲉ ⲓ̅̈̅ⲟ̅ⲗ̅ⲁ̅ⲟ̅ⲥ̅ ⲡⲉ ⲡⲉⲕⲉⲓⲱⲧ’· ⲟ̣ⲩ[... <text:line-break/><text:span text:style-name="T1"> </text:span><text:span text:style-name="T2">(4/11) </text:span> ⲟⲩⲁⲅⲅⲉⲗⲟⲥ ⲛⲧⲉ ⲡⲛⲟⲩⲧⲉ ⲉⲁ[... <text:line-break/><text:span text:style-name="T1"> </text:span><text:span text:style-name="T2">(4/12) </text:span> ⲉⲧ’ ⲛⲁⲕ ⲉⲃⲟⲗ ϩⲓⲧⲛ ϩⲉⲛⲣⲱⲙⲉ ⲉ[ⲩⲟⲩ]‐ <text:line-break/><text:span text:style-name="T1"> </text:span><text:span text:style-name="T2">(4/13) </text:span> ⲁⲁⲃ· ⲁⲙⲟⲩ ⲛⲅⲥⲓⲛⲉ ⲉⲃⲟⲗ ϩⲛ ⲛ[ⲁⲓ̈] <text:line-break/><text:span text:style-name="T1"> </text:span><text:span text:style-name="T2">(4/14) </text:span> ⲛⲁⲓ̈ ⲉⲧⲕⲛⲁⲕⲟⲧⲕ ⲉⲣⲟⲟⲩ ⲟⲛ ⲛ ⲕⲉ̣[ⲥⲟⲡ] <text:line-break/><text:span text:style-name="T1"> </text:span><text:span text:style-name="T2">(4/15) </text:span> ϩⲓⲛⲁ ϫⲉ ⲉⲕⲁⲧⲁϣⲉ ⲟⲉⲓϣ ⲛ ⲟⲩⲅⲉⲛ̣[ⲉⲁ] <text:line-break/><text:span text:style-name="T1"> </text:span><text:span text:style-name="T2">(4/16) </text:span> ⲉⲥⲟⲛϩ· ⲁⲩⲱ ⲛⲅⲛⲟⲩϩⲙ ⲛ ⲛⲏ ⲉⲧ[ⲙ]‐ <text:line-break/><text:span text:style-name="T1"> </text:span><text:span text:style-name="T2">(4/17) </text:span> ⲡϣⲁ· ⲁⲩⲱ ⲛⲅϯ ϭⲟⲙ ⲛ ⲛⲓⲥⲱⲧ[ⲡ] <text:line-break/><text:span text:style-name="T1"> </text:span><text:span text:style-name="T2">(4/18) </text:span> ϫⲉ ⲟⲩⲛⲟϭ ⲡⲉ ⲡⲓⲁⲅⲱⲛ ⲛⲧⲉ ⲡⲓⲉ̣[ⲱⲛ] <text:line-break/><text:span text:style-name="T1"> </text:span><text:span text:style-name="T2">(4/19) </text:span> ⲁⲩⲱ ϫⲉ ⲟⲩⲕⲟⲩⲉⲓ ⲡⲉ ⲡⲓⲭⲣⲟⲛⲟ[ⲥ ⲙ] <text:line-break/><text:span text:style-name="T1"> </text:span><text:span text:style-name="T2">(4/20) </text:span> ⲡⲉⲓ̈ⲙⲁ· ⲛⲁⲓ̈ ⲇⲉ ⲛⲧⲉⲣⲉϥϫⲟⲟⲩ ⲛ[ⲁⲓ̈] <text:line-break/><text:span text:style-name="T1"> </text:span><text:span text:style-name="T2">(4/21) </text:span> ⲁⲛⲟⲕ ϩⲛ ⲟⲩⲛⲟϭ ⲛ ⲓ̈ⲏⲥ ⲙⲛ ⲟⲩⲛⲟ[ϭ ⲛ] <text:line-break/><text:span text:style-name="T1"> </text:span><text:span text:style-name="T2">(4/22) </text:span> ⲟⲩⲣⲟⲧ’ ⲛ ϩⲏ[ⲧ’] ⲁⲉⲓⲁⲗⲉ ⲛⲙⲙⲁϥ ⲉϩⲣ[ⲁⲓ̈] <text:line-break/><text:span text:style-name="T1"> </text:span><text:span text:style-name="T2">(4/23) </text:span> ⲉⲩⲛⲟϭ ⲛ ⲕⲗⲟⲟⲗⲉ ⲛ ⲟⲩⲟⲉ̣[ⲓ]ⲛ̣ ⲁⲉⲓⲕ̣[ⲱ] <text:line-break/><text:span text:style-name="T1"> </text:span><text:span text:style-name="T2">(4/24) </text:span> ⲙ ⲡⲁⲡⲗⲁⲥⲙⲁ ϩⲓϫⲙ ⲡⲕⲁ[ϩ] ⲉⲩⲁⲣⲉ̣[ϩ] <text:line-break/><text:span text:style-name="T1"> </text:span><text:span text:style-name="T2">(4/25) </text:span> ⲉⲣⲟϥ ⲉⲃⲟⲗ ϩⲓⲧⲛ ϩⲉⲛⲉⲟⲟⲩ· ⲁⲩⲱ ⲁ[ⲓ̈]‐ <text:line-break/><text:span text:style-name="T1"> </text:span><text:span text:style-name="T2">(4/26) </text:span> ⲛⲟⲩϩⲙ ⲉⲃⲟⲗ [ϩ]ⲙ ⲡⲓⲕⲟⲥⲙⲟⲥ ⲧⲏⲣϥ̣ <text:line-break/><text:span text:style-name="T1"> </text:span><text:span text:style-name="T2">(4/27) </text:span> ⲙⲛ ⲡⲓ̣ⲓ̣̅ ⲅ̅ ⲛ̅[ⲛ] ⲉⲱⲛ ⲉⲧ’ϣⲟⲟⲡ’ <text:line-break/><text:span text:style-name="T1"> </text:span><text:span text:style-name="T2">(4/28) </text:span> ⲛϩⲏⲧϥ [ⲙⲛ ⲛⲟ]ⲩⲙⲛⲧ’ⲁⲅⲅⲉⲗⲟⲥ <text:line-break/><text:span text:style-name="T1"> </text:span><text:span text:style-name="T2">(4/29) </text:span> ⲙⲡⲟⲩⲛⲁⲩ ⲉⲣⲟⲛ[·] ⲁⲩⲱ ⲡⲟⲩⲁⲣ‐ <text:line-break/><text:span text:style-name="T1"> </text:span><text:span text:style-name="T2">(4/30) </text:span> ⲭⲱⲛ ⲁϥϣⲧⲟⲣⲧⲣ ϩⲁⲑⲏ ⲛ ⲧ̣[ⲉⲛϩⲓⲏ ⲙ] <text:line-break/><text:span text:style-name="T1"> </text:span><text:span text:style-name="T2">(4/31) </text:span> ⲙⲟⲟϣⲉ· ϯϭⲏⲡⲉ ⲅⲁⲣ ⲛ ⲟⲩ̣[ⲟⲉⲓⲛ] <text:line-break/><text:span text:style-name="T1"> </text:span><text:span text:style-name="T2">(5/1) </text:span> [.]ⲧⲛ[.......].[....] ⲉⲥⲥⲟⲧⲡ’ <text:line-break/><text:span text:style-name="T1"> </text:span><text:span text:style-name="T2">(5/2) </text:span> ⲛϩⲟ̣[ⲩⲟ ⲉ ⲕⲟ]ⲥ̣ⲙⲓⲕ[ⲟⲛ ⲛⲓ]ⲙ· ⲉⲩ̣ⲁⲧ’‐ <text:line-break/><text:span text:style-name="T1"> </text:span><text:span text:style-name="T2">(5/3) </text:span> ϣ̣ⲁϫ̣ⲉ ⲙⲙⲟϥ ⲡⲉ̣ ⲡ[ⲉ]ⲥ̣ⲥⲁ ⲉⲥϯ ⲟⲩⲟ‐ <text:line-break/><text:span text:style-name="T1"> </text:span><text:span text:style-name="T2">(5/4) </text:span> [ⲉ]ⲓ̣[ⲛ] ⲉ̣ⲩⲛⲧⲁⲥ ⲛ ⲟⲩϭⲟⲙ ⲉⲥϫⲓ ⲙⲟ‐ <text:line-break/><text:span text:style-name="T1"> </text:span><text:span text:style-name="T2">(5/5) </text:span> [ⲉⲓⲧ ϩ]ⲏⲧⲟⲩ ⲛ ϩⲉⲛⲡⲛ̅ⲁ̅ ⲉⲩⲟⲩⲁⲁⲃ <text:line-break/><text:span text:style-name="T1"> </text:span><text:span text:style-name="T2">(5/6) </text:span> [ⲉⲥϣ]ⲟⲟⲡ’ ⲛ ⲟⲩⲡ̣ⲛ̣̅[ⲁ̅] ⲛ̅ ⲣⲉϥⲧⲁⲛϩⲟ· <text:line-break/><text:span text:style-name="T1"> </text:span><text:span text:style-name="T2">(5/7) </text:span> [ⲙⲛ] ⲟ̣ⲩϣⲁϫⲉ ⲛ ⲛⲟⲉ̣ⲣⲟⲛ· ⲙ̅ ⲡⲣⲏⲧⲉ <text:line-break/><text:span text:style-name="T1"> </text:span><text:span text:style-name="T2">(5/8) </text:span> [ⲁⲛ ⲛ] ⲛⲏ ⲉⲧ’ϣⲟⲟⲡ’ ϩⲙ ⲡⲓⲕⲟⲥⲙⲟⲥ <text:line-break/><text:span text:style-name="T1"> </text:span><text:span text:style-name="T2">(5/9) </text:span> [..].ⲓ ⲛ̅ⲧⲉ ⲟⲩϩⲩⲗⲏ ⲉϣⲁⲥϣⲓⲃⲉ <text:line-break/><text:span text:style-name="T1"> </text:span><text:span text:style-name="T2">(5/10) </text:span> [ⲙ]ⲛ̣ ⲟⲩϣⲁϫⲉ ⲉϣⲁϥⲧⲱϭⲛ· ⲁⲩⲱ <text:line-break/><text:span text:style-name="T1"> </text:span><text:span text:style-name="T2">(5/11) </text:span> [ⲧ]ⲟ̣ⲧⲉ ⲁⲉⲓⲥⲟⲩⲱⲛ ϯϭⲟⲙ ⲉⲧ’ϣⲟ‐ <text:line-break/><text:span text:style-name="T1"> </text:span><text:span text:style-name="T2">(5/12) </text:span> [ⲟ]ⲡ’ ⲛϩⲏⲧ’ ϫⲉ ⲛⲉⲥⲕⲏ ϩⲓϫⲛ ⲡⲓⲕⲁⲕⲉ <text:line-break/><text:span text:style-name="T1"> </text:span><text:span text:style-name="T2">(5/13) </text:span> [ⲉ]ⲩⲛⲧⲁⲥ ⲙⲙⲁⲩ ⲙ ⲡⲓⲟⲩⲟⲉⲓⲛ̣ ⲧⲏⲣϥ· <text:line-break/><text:span text:style-name="T1"> </text:span><text:span text:style-name="T2">(5/14) </text:span> [ⲁ]ⲉⲓϫⲓ ⲱⲙⲥ̣ ⲙ ⲡⲓⲙⲁ ⲉⲧⲙⲙⲁⲩ· ⲁⲩⲱ <text:line-break/><text:soft-page-break/><text:span text:style-name="T1"> </text:span><text:span text:style-name="T2">(5/15) </text:span> [ⲁ]ⲉⲓϫⲓ ⲡⲓⲛⲉ ⲛ ⲛⲓⲉⲟⲟⲩ ⲉⲧ’ϩⲙ ⲡⲙⲁ <text:line-break/><text:span text:style-name="T1"> </text:span><text:span text:style-name="T2">(5/16) </text:span> [ⲉ]ⲧⲙⲙⲁⲩ· ⲁⲉⲓϣⲱⲡⲉ ⲙ ⲡⲣⲏⲧⲉ ⲛ <text:line-break/><text:span text:style-name="T1"> </text:span><text:span text:style-name="T2">(5/17) </text:span> [ⲟ]ⲩⲁ ⲙⲙⲟⲟⲩ· ⲁⲉⲓⲥⲓⲛⲉ ⲉⲃⲟⲗ ϩⲙ ⲡⲓ‐ <text:line-break/><text:span text:style-name="T1"> </text:span><text:span text:style-name="T2">(5/18) </text:span> [ⲕⲁϩ] ⲛ ⲁⲏⲣ· ⲁⲩⲱ ⲁⲉⲓⲥⲓⲛⲉ ⲛ ⲛⲓⲁⲛ‐ <text:line-break/><text:span text:style-name="T1"> </text:span><text:span text:style-name="T2">(5/19) </text:span> [ⲧⲓⲧⲩ]ⲡⲟⲥ ⲛⲛ ⲉⲱⲛ· ⲉⲁⲉⲓⲱⲙⲥ <text:line-break/><text:span text:style-name="T1"> </text:span><text:span text:style-name="T2">(5/20) </text:span> [ⲙ ⲡⲓⲙⲁ] ⲉⲧⲙⲙⲁⲩ ⲛ ⲥⲁϣϥ ⲛ ⲥⲟⲡ <text:line-break/><text:span text:style-name="T1"> </text:span><text:span text:style-name="T2">(5/21) </text:span> [ⲛ ⲟⲩⲙⲟⲟ]ⲩ ⲉϥⲟⲛϩ ⲕⲁⲧⲁ ⲡⲟⲩⲁ ⲡⲟⲩⲁ <text:line-break/><text:span text:style-name="T1"> </text:span><text:span text:style-name="T2">(5/22) </text:span> [ⲛⲧⲉ ⲛⲓ]ⲉⲱⲛ· ⲉⲙⲡⲓⲕ[ⲁ ⲧ]ⲟⲟⲧ’ ϣⲁⲛ‐ <text:line-break/><text:span text:style-name="T1"> </text:span><text:span text:style-name="T2">(5/23) </text:span> [ϯⲛⲁⲩ] ⲉ ⲙⲙⲟⲟⲩ [ⲧ]ⲏⲣ̣[ⲟⲩ ⲛ] ⲟⲩⲥⲟⲡ’ <text:line-break/><text:span text:style-name="T1"> </text:span><text:span text:style-name="T2">(5/24) </text:span> [ⲁⲩⲱ] ⲁⲓ̈ⲉⲓ ⲉϩⲣⲁⲓ̈ ⲉ [ϯⲟⲛⲧⲱ]ⲥ ⲉⲧ’ϣⲟ‐ <text:line-break/><text:span text:style-name="T1"> </text:span><text:span text:style-name="T2">(5/25) </text:span> [ⲟⲡ’] ⲙ̣ ⲡⲁⲣⲟⲓⲕⲏⲥ̣ⲓⲥ ⲁ[ⲓ̈]ϫⲓ ⲱⲙⲥ̣ ⲁⲩⲱ <text:line-break/><text:span text:style-name="T1"> </text:span><text:span text:style-name="T2">(5/26) </text:span> [....].[ⲕⲟ]ⲥ̣ⲙⲟⲥ· ⲁⲓ̈ⲉⲓ ⲉϩⲣⲁⲓ̈ ⲉ ϯⲟⲛ‐ <text:line-break/><text:span text:style-name="T1"> </text:span><text:span text:style-name="T2">(5/27) </text:span> [ⲧⲱⲥ ⲉ]ⲧ’̣ϣⲟⲟⲡ’ ⲙ ⲙⲉⲧⲁⲛⲟⲓⲁ <text:line-break/><text:span text:style-name="T1"> </text:span><text:span text:style-name="T2">(5/28) </text:span> [ⲁⲩⲱ ⲁⲉⲓ]ϫⲓ ⲱⲙⲥ ⲙ ⲡⲙⲁ ⲉⲧⲙⲙⲁⲩ <text:line-break/><text:span text:style-name="T1"> </text:span><text:span text:style-name="T2">(5/29) </text:span> [ⲛ ϥⲧ]ⲟⲟⲩ ⲛ ⲥⲟⲡ’· ⲁⲉⲓⲥⲓⲛⲉ ⲙ ⲡⲓ‐ <text:line-break/><text:span text:style-name="T1"> </text:span><text:span text:style-name="T2">(6/1) </text:span> ⲙⲉϩⲥⲟⲟⲩ̣ [ⲛ ⲉⲱⲛ] ϫ̣[........]...[.. <text:line-break/><text:span text:style-name="T1"> </text:span><text:span text:style-name="T2">(6/2) </text:span> ⲁⲩⲱ ⲁⲓ̈ⲉⲓ [ⲉϩⲣⲁⲓ̈] ⲉ ⲛⲓⲉ.[......]...[. <text:line-break/><text:span text:style-name="T1"> </text:span><text:span text:style-name="T2">(6/3) </text:span> ⲁⲓ̈ⲁϩⲉⲣⲁⲧ’ ⲙ[ⲙⲁ]ⲩ ⲉⲁⲉⲓⲛⲁⲩ ⲉⲩⲟⲩ̣ⲟⲉ̣[ⲓⲛ ⲛ]‐ <text:line-break/><text:span text:style-name="T1"> </text:span><text:span text:style-name="T2">(6/4) </text:span> ⲧⲉ ⲧⲙⲉ· ⲉϥϣⲟⲟⲡ’ ⲟⲛⲧⲱⲥ ⲉⲃ[ⲟ]ⲗ̣ ϩⲛ̣ [ⲟⲩ]‐ <text:line-break/><text:span text:style-name="T1"> </text:span><text:span text:style-name="T2">(6/5) </text:span> ⲛⲟⲩⲛⲉ ⲛⲧⲁϥ ⲛ ⲁⲩⲧⲟⲅⲉⲛⲏⲥ ⲙ[ⲛ ϩⲉⲛ]‐ <text:line-break/><text:span text:style-name="T1"> </text:span><text:span text:style-name="T2">(6/6) </text:span> ⲛⲟϭ ⲛ ⲁⲅⲅⲉⲗⲟⲥ ⲙⲛ ϩⲉⲛⲉⲟⲟ[ⲩ.... <text:line-break/><text:span text:style-name="T1"> </text:span><text:span text:style-name="T2">(6/7) </text:span> ⲉ ⲡϣⲓ· ⲁⲩ[ⲱ ⲁ]ⲉⲓϫⲓ ⲱⲙⲥ ⲉ ⲡ[ⲣⲁⲛ ⲙ] <text:line-break/><text:span text:style-name="T1"> </text:span><text:span text:style-name="T2">(6/8) </text:span> ⲡⲓⲁⲩⲧⲟⲅⲉ̣ⲛⲏⲥ ⲛ ⲛⲟⲩⲧⲉ ⲉ[ⲃⲟⲗ ϩⲓⲧⲟ]‐ <text:line-break/><text:span text:style-name="T1"> </text:span><text:span text:style-name="T2">(6/9) </text:span> ⲟⲧⲟⲩ ⲛ ⲛⲓϭⲟⲙ ⲛⲏ ⲉⲧ’ϣⲟⲟⲡ’̣ [ϩⲓϫⲛ ϩⲉⲛ]‐ <text:line-break/><text:span text:style-name="T1"> </text:span><text:span text:style-name="T2">(6/10) </text:span> ⲙⲟⲟⲩ ⲉⲩⲟⲛϩ ⲙⲓ̅ⲭ̅ⲁ̅ⲣ̅ ⲙⲛ ⲙⲓ̣̅[ⲭⲉⲁ̅] <text:line-break/><text:span text:style-name="T1"> </text:span><text:span text:style-name="T2">(6/11) </text:span> ⲁⲩⲱ ⲁⲉⲓⲧⲃⲃⲟ ⲉⲃⲟⲗ ϩⲓⲧⲟⲟⲧϥ ⲙ̣[ⲡⲓ]‐ <text:line-break/><text:span text:style-name="T1"> </text:span><text:span text:style-name="T2">(6/12) </text:span> ⲛⲟϭ ⲃ̅ⲁ̅ⲣ̅ⲫ̅ⲁ̅ⲣ̅ⲁ̅ⲅ̅ⲅ̅ⲏ̅ⲥ̅· ⲁⲩⲱ ⲁⲩ[ⲟⲩⲟⲛϩ]‐ <text:line-break/><text:span text:style-name="T1"> </text:span><text:span text:style-name="T2">(6/13) </text:span> ⲟⲩ ⲛⲁⲓ̈ ⲁⲩⲥⲁϩⲧ’ ϩⲙ ⲡⲓⲉⲟⲟⲩ· [ⲁⲩⲣ]‐ <text:line-break/><text:span text:style-name="T1"> </text:span><text:span text:style-name="T2">(6/14) </text:span> ⲥⲫⲣⲁⲅⲓⲍⲉ ⲙⲙⲟⲉⲓ ⲉⲃⲟⲗ ϩⲓⲧⲟⲟⲧ[ⲟⲩ] <text:line-break/><text:span text:style-name="T1"> </text:span><text:span text:style-name="T2">(6/15) </text:span> ⲛ ⲛⲏ ⲉⲧ’ϣⲟⲟⲡ’ ϩⲓϫⲛ ⲛⲉⲓ̈ϭⲟⲙ [ⲙ̅ⲓ̅ⲭ̅ⲁ̅ⲣ̅ 〈ⲙⲛ〉] <text:line-break/><text:span text:style-name="T1"> </text:span><text:span text:style-name="T2">(6/16) </text:span> ⲙⲓ̣̅̅[̅ⲭ̅]̅ⲉ̅ⲩ̅ⲥ̅· ⲙⲛ ⲥ̅ⲉⲗϫⲁⲱ̅ ⲙⲛ ⲉ̅ⲗⲉ̣̅[ⲛⲟⲥ] <text:line-break/><text:span text:style-name="T1"> </text:span><text:span text:style-name="T2">(6/17) </text:span> ⲙⲛ ⲍ̅ⲱ̅ⲅ̅ⲉ̅ⲛ̅ⲉ̅ⲑ̅ⲗ̅ⲟ̅ⲥ̅· ⲁⲩⲱ ⲁⲉⲓϣ[ⲱⲡⲉ] <text:line-break/><text:span text:style-name="T1"> </text:span><text:span text:style-name="T2">(6/18) </text:span> ⲛ ⲟⲩⲁⲅⲅⲉⲗⲟⲥ ⲛ ⲣⲉϥⲛⲁⲩ ⲉ ⲛⲟⲩ[ⲛⲉ] <text:line-break/><text:span text:style-name="T1"> </text:span><text:span text:style-name="T2">(6/19) </text:span> ⲁⲩⲱ ⲁⲓ̈ⲁϩⲉⲣⲁⲧ’ ϩⲓϫⲛ ⲡⲓϩⲟⲩⲉ[ⲓⲧ] <text:line-break/><text:span text:style-name="T1"> </text:span><text:span text:style-name="T2">(6/20) </text:span> ⲉⲧⲉ ⲡⲓⲙⲉϩϥⲧⲟⲟⲩ ⲛⲛ ⲉⲱⲛ ⲡ[ⲉ] <text:line-break/><text:span text:style-name="T1"> </text:span><text:span text:style-name="T2">(6/21) </text:span> ⲙⲛ ⲛⲓⲯⲩⲭⲏ ⲁⲉⲓⲥⲙ[ⲟ]ⲩ ⲉ ⲡⲓ[ⲁⲩⲧⲟ]‐ <text:line-break/><text:span text:style-name="T1"> </text:span><text:span text:style-name="T2">(6/22) </text:span> ⲅⲉⲛⲏⲥ ⲛ ⲛⲟⲩ̣ⲧⲉ· ⲙⲛ ⲡⲓ̣ϣ̣[ⲟⲣⲡ ⲛ] <text:line-break/><text:span text:style-name="T1"> </text:span><text:span text:style-name="T2">(6/23) </text:span> ⲉⲓⲱⲧ’· ⲡ̅ⲓ̅ⲅ̅ⲉ̅ⲣ̅ⲁ̅ⲇ̅ⲁ̣̅̅ⲙ̅ⲁ̅ ⲟ̣[ⲩ ⲃⲁⲗ ⲛⲧⲉ] <text:line-break/><text:span text:style-name="T1"> </text:span><text:span text:style-name="T2">(6/24) </text:span> ⲡⲓⲁⲩⲧⲟⲅⲉⲛⲏⲥ ⲡⲓϣⲟ̣ⲣ̣[ⲡ ⲛ ⲣⲱⲙⲉ] <text:line-break/><text:span text:style-name="T1"> </text:span><text:span text:style-name="T2">(6/25) </text:span> ⲛ ⲧⲉⲗⲓⲟⲥ ⲙⲛ̣ ⲥⲏⲑ ⲉⲙⲙ[ⲁⲭⲁ ⲥⲏⲑ] <text:line-break/><text:span text:style-name="T1"> </text:span><text:span text:style-name="T2">(6/26) </text:span> ⲡϣⲏⲣⲉ̣ [ⲛ]ⲧⲉ [ⲁ̅]̅ϫ̣̅̅ⲁ̣̅̅ⲙ̅ⲁ̅ⲥ̣̅̅ ⲡ[ⲉⲓⲱⲧ ⲛⲧⲉ] <text:line-break/><text:span text:style-name="T1"> </text:span><text:span text:style-name="T2">(6/27) </text:span> ϯⲅⲉ[ⲛⲉⲁ ⲛ]ⲛ̣ [ⲁⲧ]ⲕ̣ⲓ̣ⲙ̣ ⲙ̣ⲛ̣ ⲛ̣[ⲓϥⲧⲟ]‐ <text:line-break/><text:span text:style-name="T1"> </text:span><text:span text:style-name="T2">(6/28) </text:span> ⲟⲩ ⲛ [ⲫⲱⲥⲧⲏⲣ] .ⲥ.ⲏ· .[..... <text:line-break/><text:span text:style-name="T1"> </text:span><text:span text:style-name="T2">(6/29) </text:span> ⲙ̣ [..........]ⲉ̣̅ⲙ̣̅[.].[ <text:line-break/><text:span text:style-name="T1"> </text:span><text:span text:style-name="T2">(6/30) </text:span> ⲙⲛ ⲙⲓⲣⲟⲑⲉⲁ ⲧⲙⲁⲁ̣[ⲩ ....... <text:line-break/><text:span text:style-name="T1"> </text:span><text:span text:style-name="T2">(6/31) </text:span> ⲧⲉⲣ̣ ⲙⲛ ⲡⲣⲟⲫⲁⲛⲓⲁ [........ <text:line-break/><text:span text:style-name="T1"> </text:span><text:span text:style-name="T2">(6/32) </text:span> ⲛⲧⲉ ⲛⲓⲟⲩⲟⲉⲓⲛ ⲙⲛ ⲡⲇ̣̅ⲏ̅[....... <text:line-break/><text:soft-page-break/><text:span text:style-name="T1"> </text:span><text:span text:style-name="T2">(7/1) </text:span> .ⲏ̣.[.....]ⲱ̣.ⲁ[...]ⲟⲥ· ⲁⲩⲱ ⲁⲉⲓ‐ <text:line-break/><text:span text:style-name="T1"> </text:span><text:span text:style-name="T2">(7/2) </text:span> [ϫⲓ] ⲱ̣[ⲙⲥ ⲙ ⲡⲓ]ⲙ̣ⲉϩⲥⲉ̣[ⲡ’ ⲥ]ⲛⲁⲩ ⲉ ⲡⲣⲁⲛ <text:line-break/><text:span text:style-name="T1"> </text:span><text:span text:style-name="T2">(7/3) </text:span> [ⲛ]ⲧⲉ̣ ⲡⲓⲁⲩⲧⲟⲅⲉⲛ[ⲏ]ⲥ ⲛ ⲛⲟⲩⲧⲉ ⲉⲃⲟⲗ <text:line-break/><text:span text:style-name="T1"> </text:span><text:span text:style-name="T2">(7/4) </text:span> ϩⲓ̣ⲧⲟⲟⲧⲟⲩ ⲛ ⲛⲉⲓ̈ϭⲟⲙ ⲛ ⲟⲩⲱⲧ’ ⲁⲉⲓ‐ <text:line-break/><text:span text:style-name="T1"> </text:span><text:span text:style-name="T2">(7/5) </text:span> ϣⲱⲡⲉ ⲛ ⲟⲩⲁⲅⲅⲉⲗⲟⲥ ⲛ ⲅⲉⲛⲟⲥ {ⲛ ⲅⲉ‐} <text:line-break/><text:span text:style-name="T1"> </text:span><text:span text:style-name="T2">(7/6) </text:span> {ⲛⲟⲥ} ⲛ ϩⲟⲟⲩⲧ’· ⲁⲩ[ⲱ] ⲁ̣ⲉⲓⲁϩⲉⲣⲁⲧ’ ϩⲓ‐ <text:line-break/><text:span text:style-name="T1"> </text:span><text:span text:style-name="T2">(7/7) </text:span> ϫⲛ̣ ⲡⲓⲙⲉϩⲥⲛⲁⲩ ⲛⲛ ⲉⲱⲛ ⲉⲧⲉ ⲡⲓ‐ <text:line-break/><text:span text:style-name="T1"> </text:span><text:span text:style-name="T2">(7/8) </text:span> ⲙ̣[ⲉϩ]ϣⲟⲙⲧ’ ⲡⲉ ⲙⲛ ⲛϣⲏⲣⲉ ⲛⲧⲉ <text:line-break/><text:span text:style-name="T1"> </text:span><text:span text:style-name="T2">(7/9) </text:span> [ⲥ]ⲏ̣ⲑ ⲁⲉⲓⲥⲙⲟⲩ ⲉ ⲛⲁⲓ̈ ⲛⲁⲓ̈ ⲁⲩⲱ ⲁⲉⲓ̣‐ <text:line-break/><text:span text:style-name="T1"> </text:span><text:span text:style-name="T2">(7/10) </text:span> [ϫⲓ] ⲱⲙⲥ ⲙ ⲡⲓⲙⲉϩϣⲟⲙⲧ’ ⲛ ⲥⲟⲡ ⲉ <text:line-break/><text:span text:style-name="T1"> </text:span><text:span text:style-name="T2">(7/11) </text:span> ⲡⲣⲁⲛ ⲙ ⲡⲓⲁⲩⲧⲟⲅⲉⲛⲏⲥ ⲛ ⲛⲟⲩⲧⲉ <text:line-break/><text:span text:style-name="T1"> </text:span><text:span text:style-name="T2">(7/12) </text:span> ⲉⲃⲟⲗ ϩⲓⲧⲟ̣ⲟⲧⲟⲩ ⲛ ⲛⲉⲓ̈ϭⲟⲙ ⲛⲉⲓ̈ϭⲟⲙ <text:line-break/><text:span text:style-name="T1"> </text:span><text:span text:style-name="T2">(7/13) </text:span> [ⲁⲓ̈]ϣ̣ⲱⲡⲉ ⲛ ⲟⲩⲁⲅⲅⲉⲗⲟⲥ ⲉϥⲟⲩ̣ⲁⲁⲃ <text:line-break/><text:span text:style-name="T1"> </text:span><text:span text:style-name="T2">(7/14) </text:span> [ⲁ]ⲉⲓ[ⲁ]ϩⲉ̣ⲣⲁⲧ’̣ ϩⲓϫⲛ ⲡⲓⲙⲉϩ{ⲥⲛⲁⲩ} →ⲅ̅← <text:line-break/><text:span text:style-name="T1"> </text:span><text:span text:style-name="T2">(7/15) </text:span> [ⲛ ⲉⲱ]ⲛ· ⲉ[ⲧ]ⲉ ⲡⲓⲙⲉϩⲥⲛⲁⲩ ⲡⲉ ⲁⲉⲓ‐ <text:line-break/><text:span text:style-name="T1"> </text:span><text:span text:style-name="T2">(7/16) </text:span> [ⲥⲙⲟ]ⲩ̣ ⲉ [ⲛ]ⲁ̣ⲓ̈ ⲛⲁⲓ̈· ⲁⲩⲱ ⲁⲉⲓϫⲓ ⲱ̣ⲙⲥ <text:line-break/><text:span text:style-name="T1"> </text:span><text:span text:style-name="T2">(7/17) </text:span> [ⲙ ⲡⲓⲙⲉϩ]ⲇ̅ ⲛ ⲥⲟ̣ⲡ’ ⲉⲃⲟⲗ ϩⲓⲧⲟⲟⲧⲟⲩ <text:line-break/><text:span text:style-name="T1"> </text:span><text:span text:style-name="T2">(7/18) </text:span> [ⲛ ⲛⲉⲓ̈ϭⲟⲙ ⲛ]ⲉ̣ⲓ̈[ϭ]ⲟⲙ ⲁⲓ̈ϣⲱⲡⲉ ⲛ <text:line-break/><text:span text:style-name="T1"> </text:span><text:span text:style-name="T2">(7/19) </text:span> [ⲟⲩⲁⲅⲅⲉⲗⲟ]ⲥ̣ ⲛ̣ ⲧⲉⲗⲓⲟⲥ· ⲁⲩⲱ <text:line-break/><text:span text:style-name="T1"> </text:span><text:span text:style-name="T2">(7/20) </text:span> [ⲁⲓ̈ⲁϩⲉⲣⲁⲧ’ ϩⲓϫⲙ] ⲡ̣ⲓⲙⲉϩϥⲧⲟⲟⲩ ⲉ‐ <text:line-break/><text:span text:style-name="T1"> </text:span><text:span text:style-name="T2">(7/21) </text:span> [ⲧⲉ ⲡⲓϩⲟⲩⲉⲓⲧ ⲡⲉ ⲛ]ⲛ ⲉⲱⲛ ⲁⲩⲱ ⲁⲉⲓ‐ <text:line-break/><text:span text:style-name="T1"> </text:span><text:span text:style-name="T2">(7/22) </text:span> [ⲥⲙⲟⲩ ⲉ ⲛⲁⲓ̈ ⲛⲁⲓ̈· ⲧ]ⲟⲧⲉ ⲁ̣ⲉⲓϣⲓⲛⲉ <text:line-break/><text:span text:style-name="T1"> </text:span><text:span text:style-name="T2">(7/23) </text:span> [.............]ⲉϥⲏ[...]. ⲁⲉⲓϫⲉ <text:line-break/><text:span text:style-name="T1"> </text:span><text:span text:style-name="T2">(7/24) </text:span> [ ]ⲉ ⲁⲛⲟⲕ <text:line-break/><text:span text:style-name="T1"> </text:span><text:span text:style-name="T2">(7/25) </text:span> [ ]. ⲛ̣ⲧⲉ <text:line-break/><text:span text:style-name="T1"> </text:span><text:span text:style-name="T2">(7/26) </text:span> [ ]ⲁ̣ⲛ̣ⲟⲕ <text:line-break/><text:span text:style-name="T1"> </text:span><text:span text:style-name="T2">(7/27) </text:span> [.........]ⲉ̣ ⲙⲙⲟϥ [.....]ⲧ̣ⲉⲡⲓ <text:line-break/><text:span text:style-name="T1"> </text:span><text:span text:style-name="T2">(7/28) </text:span> [.........] ⲉⲧⲃⲉ ⲟⲩ [....]ⲛⲉ ϩⲉⲛ‐ <text:line-break/><text:span text:style-name="T1"> </text:span><text:span text:style-name="T2">(7/29) </text:span> [....]ⲣ̣[..]. ϩⲛ ϯϭⲟⲙ [.....]ⲧⲙ <text:line-break/><text:span text:style-name="T1"> </text:span><text:span text:style-name="T2">(7/30) </text:span> ⲉⲣⲟⲟⲩ ⲛ ⲕⲉⲣⲏⲧⲉ ϩⲛ ⲛⲓⲥ̣ⲱ̣ⲧⲙ <text:line-break/><text:span text:style-name="T1"> </text:span><text:span text:style-name="T2">(8/1) </text:span> ⲛⲧⲉ ⲛⲓⲣⲱⲙ[ⲉ] ⲁ̣ⲩⲱ [ⲛⲁⲓ̈ ⲛ]ⲁ̣ⲓ̈ ⲛⲉ [ⲛⲉ]ⲩ‐ <text:line-break/><text:span text:style-name="T1"> </text:span><text:span text:style-name="T2">(8/2) </text:span> ϭⲟⲙ· ⲏ%0 ⲛⲁⲓ̣̈ ⲣ̣[ⲱ] ⲛⲉ ⲛⲉⲩⲣⲁⲛ ⲇ̣ⲉ ⲥⲉϣⲉ‐ <text:line-break/><text:span text:style-name="T1"> </text:span><text:span text:style-name="T2">(8/3) </text:span> ⲃⲓⲏⲟⲩⲧ’ ⲉ ⲛⲉⲩ̣ⲉⲣⲏⲩ· ⲁⲩⲱ ⲉϣϫⲉ ⲟⲩ <text:line-break/><text:span text:style-name="T1"> </text:span><text:span text:style-name="T2">(8/4) </text:span> ⲛ ⲯⲩⲭⲏ ϣⲉⲃⲓⲏⲟⲩⲧ’ ⲉ ⲯⲩⲭⲏ· ⲁⲩⲱ <text:line-break/><text:span text:style-name="T1"> </text:span><text:span text:style-name="T2">(8/5) </text:span> ⲉⲧⲃⲉ ⲟⲩ ⲉⲣⲉⲛⲓⲣⲱⲙⲉ ϣⲉⲃⲓⲏⲟⲩⲧ’ <text:line-break/><text:span text:style-name="T1"> </text:span><text:span text:style-name="T2">(8/6) </text:span> ⲉ ⲛⲉⲩⲉⲣⲏⲩ ϩⲛ̣ ⲟⲩ ⲏ%0 ⲟⲩⲏⲣ ⲣⲱ ⲛ ⲣⲱ‐ <text:line-break/><text:span text:style-name="T1"> </text:span><text:span text:style-name="T2">(8/7) </text:span> ⲙⲉ ⲛⲉ· ⲁⲩⲱ ⲡⲉϫⲁϥ ⲛⲁⲓ̈ ⲛ[ϭⲓ] ⲡⲓⲛⲟϭ <text:line-break/><text:span text:style-name="T1"> </text:span><text:span text:style-name="T2">(8/8) </text:span> ⲉⲧⲁⲙⲁϩⲧⲉ ⲙ ⲡϫⲓⲥⲉ ⲁ̅ⲩ̅ⲑ̣̅̅ⲣ̣̅̅ⲟ̅ⲩ̅ⲛ̅ⲓ̅ⲟ̅ⲥ̅ <text:line-break/><text:span text:style-name="T1"> </text:span><text:span text:style-name="T2">(8/9) </text:span> ϫⲉ ⲉϣϫⲉ ⲉⲕⲕⲱⲧⲉ ⲙⲉⲛ ⲛⲥⲁ ⲛⲏ <text:line-break/><text:span text:style-name="T1"> </text:span><text:span text:style-name="T2">(8/10) </text:span> ⲉⲧⲁⲕⲥⲓⲛⲉ ⲉⲃⲟⲗ ⲛϩⲏⲧⲟⲩ· ⲏ̣%0 ⲉ̣‐ <text:line-break/><text:span text:style-name="T1"> </text:span><text:span text:style-name="T2">(8/11) </text:span> ⲧⲃⲉ ⲡⲉⲓ̈ⲕⲁϩ ⲛⲛ ⲁⲏⲣ ϫⲉ ⲉⲧⲃⲉ ⲟⲩ ⲟⲩ̣ⲛ‐ <text:line-break/><text:span text:style-name="T1"> </text:span><text:span text:style-name="T2">(8/12) </text:span> ⲧⲁϥ ⲡⲉⲓ̈ⲧⲩⲡⲟⲥ ⲛ̅ ⲕⲟⲥ̣ⲙⲓⲕⲟⲛ· ⲏ%0 [ⲉ]‐ <text:line-break/><text:span text:style-name="T1"> </text:span><text:span text:style-name="T2">(8/13) </text:span> ⲧⲃⲉ ⲛⲓⲁⲛⲧⲓⲧⲩⲡⲟⲥ ⲛⲛ ⲉⲱⲛ ϫⲉ [ⲟⲩ]‐ <text:line-break/><text:span text:style-name="T1"> </text:span><text:span text:style-name="T2">(8/14) </text:span> ⲏⲣ ⲡ̣ⲉ· ⲏ%0 ⲉⲧⲃⲉ ⲟⲩ ⲛⲥⲉⲙⲟⲕϩ̣ [ⲁⲛ] <text:line-break/><text:span text:style-name="T1"> </text:span><text:span text:style-name="T2">(8/15) </text:span> ⲏ%0 ⲉⲧⲃⲉ ϯⲡⲁⲣⲟⲓⲕⲏⲥ[ⲓ]ⲥ ⲙⲛ [ϯⲙⲉⲧⲁ]‐ ‐ <text:line-break/><text:span text:style-name="T1"> </text:span><text:span text:style-name="T2">(8/16) </text:span> ⲛⲟⲓⲁ ⲙⲛ ⲉⲧⲃⲉ ϯⲕⲧ[ⲓⲥ]ⲓ̣ⲥ ⲛⲛ̣ [ⲉⲱⲛ] <text:line-break/><text:span text:style-name="T1"> </text:span><text:span text:style-name="T2">(8/17) </text:span> ⲙⲛ ⲡⲓⲕⲟⲥⲙⲟⲥ ⲉⲧⲉ ⲛ[ⲓ]ⲣ̣[........ <text:line-break/><text:soft-page-break/><text:span text:style-name="T1"> </text:span><text:span text:style-name="T2">(8/18) </text:span> ⲟⲛⲧⲱⲥ· ϩⲛ 〈ⲟⲩ〉ⲟⲩⲱⲛϩ ⲉ̣ⲃ̣[ⲟⲗ .....ⲙ] <text:line-break/><text:span text:style-name="T1"> </text:span><text:span text:style-name="T2">(8/19) </text:span> ⲙⲟⲕ· ⲉⲧⲃⲉ ⲛ[ <text:line-break/><text:span text:style-name="T1"> </text:span><text:span text:style-name="T2">(8/20) </text:span> ⲙⲙⲟⲓ̈ ⲉⲣⲟⲟ[ⲩ <text:line-break/><text:span text:style-name="T1"> </text:span><text:span text:style-name="T2">(8/21) </text:span> ⲟⲩⲧⲉ ⲟⲩⲉϩ[ <text:line-break/><text:span text:style-name="T1"> </text:span><text:span text:style-name="T2">(8/22) </text:span> ⲛⲁⲕ ⲉⲃⲟⲗ· ⲁ[ ⲡ̅ⲛ̅ⲁ̅ ⲛ̅] <text:line-break/><text:span text:style-name="T1"> </text:span><text:span text:style-name="T2">(8/23) </text:span> ⲛ ⲁⲧⲛⲁ̣ⲩ ⲉⲣ[ⲟϥ <text:line-break/><text:span text:style-name="T1"> </text:span><text:span text:style-name="T2">(8/24) </text:span> ⲙⲛ ϯ̣[...]ⲱⲉ̣[ <text:line-break/><text:span text:style-name="T1"> </text:span><text:span text:style-name="T2">(8/25) </text:span> ⲛⲧⲉ [ <text:line-break/><text:span text:style-name="T1"> </text:span><text:span text:style-name="T2">(8/26) </text:span> ⲙⲟⲥ̣ [ <text:line-break/><text:span text:style-name="T1"> </text:span><text:span text:style-name="T2">(8/27) </text:span> ⲏ̅ [ <text:line-break/><text:span text:style-name="T1"> </text:span><text:span text:style-name="T2">(8/28) </text:span> ⲉⲧ[....]ⲗⲡ’ ⲛ[..]ⲕ [......... <text:line-break/><text:span text:style-name="T1"> </text:span><text:span text:style-name="T2">(8/29) </text:span> ⲁⲩⲱ̣ [..]ⲙⲁⲓ̈ ϩⲱ· [.......... <text:line-break/><text:span text:style-name="T1"> </text:span><text:span text:style-name="T2">(8/30) </text:span> ⲛⲉ[....]ⲏ ⲉⲧⲁⲓ̈ⲥ.[......... <text:line-break/><text:span text:style-name="T1"> </text:span><text:span text:style-name="T2">(9/1) </text:span> ⲡⲉϫ[ⲁϥ ⲛⲁⲓ̈ ⲛ]ϭⲓ ⲡⲓⲛ[ⲟϭ] ⲉⲧⲁⲙⲁϩⲧⲉ <text:line-break/><text:span text:style-name="T1"> </text:span><text:span text:style-name="T2">(9/2) </text:span> ⲙ ⲡ[ϫⲓ]ⲥ̣ⲉ ⲁ̅ⲩ̅ⲑ̅ⲣ̅ⲟ̅ⲩ̣̅̅ⲛ̣̅̅ⲓ̅ⲟ̅ⲥ̅ ϫⲉ ⲡⲕⲁϩ <text:line-break/><text:span text:style-name="T1"> </text:span><text:span text:style-name="T2">(9/3) </text:span> ⲙⲉⲛ ⲛⲛ ⲁⲏⲣ ⲁϥϩϣⲱⲡⲉ ϩⲛ ⲟ̣ⲩ‐· <text:line-break/><text:span text:style-name="T1"> </text:span><text:span text:style-name="T2">(9/4) </text:span> ϣⲁϫⲉ· ⲛⲓϫⲡⲟ ⲇⲉ ⲙⲛ ⲛⲏ ⲉⲧ’ⲧⲁ‐ <text:line-break/><text:span text:style-name="T1"> </text:span><text:span text:style-name="T2">(9/5) </text:span> ⲕⲏⲟⲩⲧ’ ⲉϥⲟⲩⲱⲛϩ ⲙⲙⲟⲟⲩ ⲉⲃⲟⲗ <text:line-break/><text:span text:style-name="T1"> </text:span><text:span text:style-name="T2">(9/6) </text:span> ϩⲛ ⲟⲩⲙⲛⲧ’ⲁⲧ’ⲧⲁⲕⲟ[·] ⲉⲧⲃⲉ ⲡⲓ ⲉϩⲣⲁⲓ̈ <text:line-break/><text:span text:style-name="T1"> </text:span><text:span text:style-name="T2">(9/7) </text:span> ⲛⲧⲉ ⲛⲓⲛⲟϭ ⲛ ⲕⲣⲓⲧⲏⲥ· ϩⲓⲛⲁ ϫⲉ ⲛⲛⲟⲩ‐ <text:line-break/><text:span text:style-name="T1"> </text:span><text:span text:style-name="T2">(9/8) </text:span> ϫⲓ ϯⲡⲉ ⲛⲛ ⲉⲥⲑⲏⲥⲓⲥ ⲁⲩⲱ ⲛⲥⲉⲧⲙ‐ <text:line-break/><text:span text:style-name="T1"> </text:span><text:span text:style-name="T2">(9/9) </text:span> ⲱⲣⲃ [ϩ]ⲛ ϯⲕⲧⲓⲥⲓⲥ· ⲉⲧⲁⲩⲉⲓ ⲇⲉ ⲉϩⲣⲁⲓ̈ <text:line-break/><text:span text:style-name="T1"> </text:span><text:span text:style-name="T2">(9/10) </text:span> ⲉϫⲙ ⲡⲁⲓ̈· ⲁⲩⲱ ⲉⲧⲁⲩⲛⲁⲩ ⲉⲃⲟⲗ ϩⲓⲧⲙ <text:line-break/><text:span text:style-name="T1"> </text:span><text:span text:style-name="T2">(9/11) </text:span> ⲡⲁⲓ̈ ⲉ ⲛⲓϩⲃⲏⲩⲉ ⲛⲧⲉ ⲡⲓⲕⲟⲥⲙⲟⲥ ⲉⲩ‐ <text:line-break/><text:span text:style-name="T1"> </text:span><text:span text:style-name="T2">(9/12) </text:span> ϯ ϩⲁⲡ’ ⲉ ⲡⲉϥⲁⲣⲭⲱⲛ ⲉϩⲣⲁⲓ̈ ⲉⲩⲧⲁⲕⲟ <text:line-break/><text:span text:style-name="T1"> </text:span><text:span text:style-name="T2">(9/13) </text:span> ⲉ̣ⲩⲧⲩⲡⲟ̣ⲥ ⲡⲉ ⲛⲧⲉ ⲡⲕⲟⲥⲙⲟ̣ⲥ ⲉⲩ <text:line-break/><text:span text:style-name="T1"> </text:span><text:span text:style-name="T2">(9/14) </text:span> [...].ⲁⲧⲉ̣ ⲙⲛ ⲟⲩⲁⲣⲭⲏ ⲛⲧⲉ ϯϩⲩⲗⲏ <text:line-break/><text:span text:style-name="T1"> </text:span><text:span text:style-name="T2">(9/15) </text:span> [ⲉⲧϫ]ⲡⲟ ⲛ ⲕ̣ⲁ̣ⲕⲉ ⲉⲧ’ⲧⲁⲕⲏⲟⲩⲧ’· <text:line-break/><text:span text:style-name="T1"> </text:span><text:span text:style-name="T2">(9/16) </text:span> [ⲛⲁⲓ̈] ⲛⲁⲓ̈ ⲇ[ⲉ] ϯⲥⲟⲫⲓⲁ ⲉⲧⲁⲥϭⲱϣⲧ <text:line-break/><text:span text:style-name="T1"> </text:span><text:span text:style-name="T2">(9/17) </text:span> [ⲉⲣⲟⲟⲩ] ⲁⲥⲧⲁⲩⲉ ⲡⲓⲕⲁⲕⲉ ⲉⲥ‐ <text:line-break/><text:span text:style-name="T1"> </text:span><text:span text:style-name="T2">(9/18) </text:span> [.......]...ⲕⲏ ϩⲁⲧⲟⲟⲧϥ ⲙ ⲡⲓ‐ <text:line-break/><text:span text:style-name="T1"> </text:span><text:span text:style-name="T2">(9/19) </text:span> [........ⲟⲩⲧ]ⲩⲡⲟⲥ ⲡⲉ ⲛⲛⲁ‐ <text:line-break/><text:span text:style-name="T1"> </text:span><text:span text:style-name="T2">(9/20) </text:span> [ ] ⲛ̣ⲧⲉ ϯⲟⲩⲥⲓⲁ ⲛ <text:line-break/><text:span text:style-name="T1"> </text:span><text:span text:style-name="T2">(9/21) </text:span> [ ]ⲙⲟⲣⲫⲏ ⲛⲛ ⲁⲧ’‐ <text:line-break/><text:span text:style-name="T1"> </text:span><text:span text:style-name="T2">(9/22) </text:span> [ ].ⲉⲩ̣ⲉ̣ⲓⲇⲟⲥ ⲛ <text:line-break/><text:span text:style-name="T1"> </text:span><text:span text:style-name="T2">(9/23) </text:span> [ ]ⲁ̣ⲓⲉⲕⲟ <text:line-break/><text:span text:style-name="T1"> </text:span><text:span text:style-name="T2">(9/24) </text:span> [ ] ⲡⲧⲏⲣϥ <text:line-break/><text:span text:style-name="T1"> </text:span><text:span text:style-name="T2">(9/25) </text:span> [ ]ⲟ̣ⲉⲧ’ <text:line-break/><text:span text:style-name="T1"> </text:span><text:span text:style-name="T2">(9/26) </text:span> [ ].[.....]ϭ̣ⲉ <text:line-break/><text:span text:style-name="T1"> </text:span><text:span text:style-name="T2">(9/27) </text:span> [........].[.]ⲕⲁⲕⲉ· [....]ⲟ̣ ⲉⲃⲟⲗ <text:line-break/><text:span text:style-name="T1"> </text:span><text:span text:style-name="T2">(9/28) </text:span> [......]ϣⲁϫⲉ ⲉⲙ[...]ⲓ̣ϭⲟⲙ <text:line-break/><text:span text:style-name="T1"> </text:span><text:span text:style-name="T2">(9/29) </text:span> [..... ⲉ]ⲱⲛ ⲛⲧⲉ̣ [ϯⲕⲧⲓ]ⲥⲓⲥ ⲉ <text:line-break/><text:span text:style-name="T1"> </text:span><text:span text:style-name="T2">(9/30) </text:span> ⲛ̣ⲁⲩ ⲉⲩⲗⲁⲁⲩ ⲛⲧⲉ ⲛⲓ̣[ϣⲁ] ⲉⲛⲉϩ̣ <text:line-break/><text:span text:style-name="T1"> </text:span><text:span text:style-name="T2">(10/1) </text:span> ⲁϥⲛⲁⲩ ⲉⲩ[ⲉⲓ]ⲇⲱⲗ[ⲟⲛ ⲁⲩ]ⲱ̣ ⲡⲣⲟⲥ <text:line-break/><text:span text:style-name="T1"> </text:span><text:span text:style-name="T2">(10/2) </text:span> ⲡⲓⲉⲓⲇⲱⲗ[ⲟⲛ] ⲉⲧⲁϥ[ⲛⲁⲩ ⲉⲣⲟ]ϥ ⲉⲧⲛ‐ <text:line-break/><text:span text:style-name="T1"> </text:span><text:span text:style-name="T2">(10/3) </text:span> ϩⲣⲁⲓ̈ ⲛϩⲏⲧϥ [ⲁϥ]ⲧⲁⲙⲓⲟ ⲙ ⲡⲕⲟⲥⲙⲟⲥ· <text:line-break/><text:span text:style-name="T1"> </text:span><text:span text:style-name="T2">(10/4) </text:span> ⲁⲩⲱ ϩⲛ ⲟⲩⲉⲓⲇⲱⲗⲟⲛ ⲛⲧⲉ ⲟⲩⲉⲓ‐ <text:line-break/><text:soft-page-break/><text:span text:style-name="T1"> </text:span><text:span text:style-name="T2">(10/5) </text:span> ⲇⲱⲗⲟⲛ ⲁϥⲣ ϩⲱⲃ ⲉ ⲡⲕⲟⲥⲙⲟⲥ· <text:line-break/><text:span text:style-name="T1"> </text:span><text:span text:style-name="T2">(10/6) </text:span> ⲁⲩⲱ ⲡⲓⲕⲉⲉⲓⲇⲱⲗⲟⲛ ⲛⲧⲉ ⲡⲟⲩ‐ <text:line-break/><text:span text:style-name="T1"> </text:span><text:span text:style-name="T2">(10/7) </text:span> ⲱⲛϩ ⲉⲃⲟⲗ ⲁⲩϥⲓⲧϥ ⲛⲧⲟⲟⲧϥ· ⲉⲧⲁⲩ‐ <text:line-break/><text:span text:style-name="T1"> </text:span><text:span text:style-name="T2">(10/8) </text:span> ϯ ⲇⲉ ⲛ ⲟⲩⲙⲁ ⲛ ⲙⲧⲟⲛ ⲛ ϯⲥⲟⲫⲓⲁ <text:line-break/><text:span text:style-name="T1"> </text:span><text:span text:style-name="T2">(10/9) </text:span> ⲛ ⲧϣⲉⲃⲓⲱ ⲛ ⲧⲉⲥⲙⲉⲧⲁⲛⲟⲓⲁ· ⲉⲃⲟⲗ <text:line-break/><text:span text:style-name="T1"> </text:span><text:span text:style-name="T2">(10/10) </text:span> ⲇⲉ ϩⲙ ⲡⲁⲓ̈ ⲉⲙⲛ ⲗⲁⲁⲩ ϩⲣⲁⲓ̈ ⲛϩⲏⲧⲥ ⲛ <text:line-break/><text:span text:style-name="T1"> </text:span><text:span text:style-name="T2">(10/11) </text:span> ϣⲟⲣⲡ’ ⲛ ⲉⲓⲇⲱⲗⲟⲛ ⲉϥⲧⲃⲃⲏⲟⲧ <text:line-break/><text:span text:style-name="T1"> </text:span><text:span text:style-name="T2">(10/12) </text:span> ⲛϩⲣⲁⲓ̈ ⲛϩⲏⲧϥ ⲡⲣ[ⲱ]ⲟⲛ ⲏ ϩⲏⲇⲏ ⲉⲧⲁⲩ‐ <text:line-break/><text:span text:style-name="T1"> </text:span><text:span text:style-name="T2">(10/13) </text:span> ϣⲱⲡⲉ ⲉⲃⲟⲗ ϩⲓⲧⲟⲟ̣ⲧϥ· ⲁϥⲣ ⲫⲁⲛ‐ <text:line-break/><text:span text:style-name="T1"> </text:span><text:span text:style-name="T2">(10/14) </text:span> ⲧⲁⲍⲉⲥⲑⲁⲓ ⲁϥⲣ ϩⲱⲃ ⲉ ⲛ[ⲓ]ⲕⲉ̣[ϣ]ⲱϫⲡ’ <text:line-break/><text:span text:style-name="T1"> </text:span><text:span text:style-name="T2">(10/15) </text:span> ⲛ ⲟ[ⲩ]ⲟⲉⲓϣ ⲅⲁⲣ ⲛⲓⲙ ⲉ̣ⲥⲧⲁ[ⲕⲏⲟⲩ]ⲧ’ <text:line-break/><text:span text:style-name="T1"> </text:span><text:span text:style-name="T2">(10/16) </text:span> ⲛϭⲓ ϯϩⲓⲕⲱⲛ ⲛⲧⲉ [ϯ]ⲥ̣ⲟⲫⲓ̣[ⲁ <text:line-break/><text:span text:style-name="T1"> </text:span><text:span text:style-name="T2">(10/17) </text:span> ⲉⲥⲉ ⲛ ϩⲁⲗϩⲟ· ⲡ[ⲓ]ⲁⲣⲭ̣[ⲱ]ⲛ̣ ⲇⲉ̣[ <text:line-break/><text:span text:style-name="T1"> </text:span><text:span text:style-name="T2">(10/18) </text:span> ⲛⲉ ⲁⲩⲱ →ⲉϥⲣ ⲥⲱⲙ[ⲁ]← ⲉϥⲡⲓ̣[.]. ⲛⲟ̣[ <text:line-break/><text:span text:style-name="T1"> </text:span><text:span text:style-name="T2">(10/19) </text:span> ⲉⲧⲃⲉ ⲡⲓϩⲟⲩⲉ ...[ <text:line-break/><text:span text:style-name="T1"> </text:span><text:span text:style-name="T2">(10/20) </text:span> ⲉⲡⲉⲥⲏⲧ’· ⲉ.[ <text:line-break/><text:span text:style-name="T1"> </text:span><text:span text:style-name="T2">(10/21) </text:span> ⲧⲁⲉⲓⲛⲁⲩ ⲉ[ <text:line-break/><text:span text:style-name="T1"> </text:span><text:span text:style-name="T2">(10/22) </text:span> ⲉⲫⲏⲧ’ ⲛ ⲧⲉ[ <text:line-break/><text:span text:style-name="T1"> </text:span><text:span text:style-name="T2">(10/23) </text:span> ϫⲛ ⲛⲉⲧⲉⲛⲥ̣[ <text:line-break/><text:span text:style-name="T1"> </text:span><text:span text:style-name="T2">(10/24) </text:span> ⲉⲁϥⲕ.[ <text:line-break/><text:span text:style-name="T1"> </text:span><text:span text:style-name="T2">(10/25) </text:span> ⲛⲉⲱ[ <text:line-break/><text:span text:style-name="T1"> </text:span><text:span text:style-name="T2">(10/26) </text:span> ⲛϩⲟⲩ[ <text:line-break/><text:span text:style-name="T1"> </text:span><text:span text:style-name="T2">(10/27) </text:span> ⲛ ⲛ[ <text:line-break/><text:span text:style-name="T1"> </text:span><text:span text:style-name="T2">(10/28) </text:span> ⲁⲩ[....]...[......... <text:line-break/><text:span text:style-name="T1"> </text:span><text:span text:style-name="T2">(10/29) </text:span> ⲧⲉⲗ[ⲓⲟ]ⲥ̣ ⲉⲃⲟⲗ̣ ϩ̣ⲓⲧ[...... <text:line-break/><text:span text:style-name="T1"> </text:span><text:span text:style-name="T2">(10/30) </text:span> ⲡⲓⲣ.[....]ϫ ⲡⲁⲓ̈ ⲉ[....... <text:line-break/><text:span text:style-name="T1"> </text:span><text:span text:style-name="T2">(10/31) </text:span> ⲏⲣ.[....] ⲉⲃⲟⲗ ϩⲓⲧⲟ̣[ⲟ]ⲧ̣ϥ· ⲉⲁϥ[ⲟⲩ] <text:line-break/><text:span text:style-name="T1"> </text:span><text:span text:style-name="T2">(11/1) </text:span> ⲱ̣ⲛ[ϩ ⲉⲃⲟⲗ ⲙ] ⲡⲓⲧⲁ[ⲕ]ⲟ ⲛⲧⲉ ⲡⲕⲟⲥⲙⲟⲥ <text:line-break/><text:span text:style-name="T1"> </text:span><text:span text:style-name="T2">(11/2) </text:span> ϩⲛ ⲟ̣[ⲩⲙⲛⲧ’]ⲁⲧ’[ⲟⲩ[ⲱ]ⲧⲃ ⲉⲃⲟⲗ· ⲛⲓⲁⲛ‐ <text:line-break/><text:span text:style-name="T1"> </text:span><text:span text:style-name="T2">(11/3) </text:span> [ⲧⲓⲧⲩ]ⲡ̣ⲟⲥ ⲇⲉ ⲛⲛ ⲉⲱⲛ ⲉⲩϣ̣ⲟⲟⲡ’ <text:line-break/><text:span text:style-name="T1"> </text:span><text:span text:style-name="T2">(11/4) </text:span> ⲙ ⲡⲉ[ⲓ̈]ⲣⲏⲧⲉ· ⲛⲧⲟⲟⲩ ⲙⲉⲛ ⲙⲡⲟⲩ‐ <text:line-break/><text:span text:style-name="T1"> </text:span><text:span text:style-name="T2">(11/5) </text:span> ϣⲁϣⲛⲓ ⲉⲩⲉⲓⲇⲉⲁ ⲛⲧⲉ ⲟⲩϭⲟⲙ ⲛ <text:line-break/><text:span text:style-name="T1"> </text:span><text:span text:style-name="T2">(11/6) </text:span> ⲟⲩⲱⲧ’· ϩⲉⲛⲉⲟⲟⲩ̣ [ⲛ]ⲉ ⲛ ϣⲁ ⲉⲛⲉϩ <text:line-break/><text:span text:style-name="T1"> </text:span><text:span text:style-name="T2">(11/7) </text:span> ⲉⲧⲛⲧⲁⲩ ⲙⲙⲁⲩ· ⲁⲩⲱ ⲥⲉϣⲟⲟⲡ’ <text:line-break/><text:span text:style-name="T1"> </text:span><text:span text:style-name="T2">(11/8) </text:span> ⲛ ϩⲉⲛⲙⲁ ⲛ ϯ ϩⲁⲡ’ ⲛⲧⲉ ⲧⲟⲩⲉⲓ ⲧⲟⲩ‐ <text:line-break/><text:span text:style-name="T1"> </text:span><text:span text:style-name="T2">(11/9) </text:span> ⲉⲓ ⲛⲧ̣ⲉ ⲛⲓϭⲟⲙ· ⲉϣⲱⲡⲉ ⲇⲉ ⲉⲩϣⲁ̅‐ <text:line-break/><text:span text:style-name="T1"> </text:span><text:span text:style-name="T2">(11/10) </text:span> ϫⲓ ⲟⲩⲟ̣ⲉⲓⲛ ⲛϭⲓ ⲛⲓⲯⲩⲭⲏ ⲉⲃⲟⲗ ϩⲓⲧⲛ <text:line-break/><text:span text:style-name="T1"> </text:span><text:span text:style-name="T2">(11/11) </text:span> ⲡ’ⲟⲩⲟ̣ⲉ̣[ⲓ]ⲛ̣ ⲉⲧ̣ϣⲟⲟⲡ’ ⲛϩⲏⲧⲟⲩ ⲙⲛ <text:line-break/><text:span text:style-name="T1"> </text:span><text:span text:style-name="T2">(11/12) </text:span> ⲡⲓⲧⲩⲡ̣[ⲟⲥ] ⲉⲧ̣ⲉ ϣⲁϥϣⲱⲡⲉ ⲛϩⲏ‐ <text:line-break/><text:span text:style-name="T1"> </text:span><text:span text:style-name="T2">(11/13) </text:span> ⲧⲟⲩ̣ ⲛ [ⲟⲩ]ⲙ̣ⲏⲏϣⲉ ⲛ ⲥⲟⲡ’ ϩⲛ ⲟⲩⲙⲛⲧ’‐ <text:line-break/><text:span text:style-name="T1"> </text:span><text:span text:style-name="T2">(11/14) </text:span> [ⲁ]ⲧ’ϫ[ⲓ] ⲙⲕ[ⲁ]ϩ̣ ⲙ̣ⲁ̣ⲥⲙⲉⲉⲩⲉ ϫⲉ ⲉⲥⲛⲁⲩ <text:line-break/><text:span text:style-name="T1"> </text:span><text:span text:style-name="T2">(11/15) </text:span> [ⲉ .]ⲓⲧⲁ̣[...]ⲙⲉ ⲁ̣ⲩⲱ ⲡⲓϣⲁ ⲉⲛⲉϩ <text:line-break/><text:span text:style-name="T1"> </text:span><text:span text:style-name="T2">(11/16) </text:span> [.]..[....] ϩ̣[ⲙ] ⲡⲓⲙⲁⲕⲁⲣⲓⲟⲥ ⲛ ⲉⲓ‐ <text:line-break/><text:span text:style-name="T1"> </text:span><text:span text:style-name="T2">(11/17) </text:span> [.........] ⲛ ϯⲟⲩⲉⲓ ⲛ ⲟⲩⲱⲧ’ <text:line-break/><text:span text:style-name="T1"> </text:span><text:span text:style-name="T2">(11/18) </text:span> [ ] ⲧⲟⲩⲉⲓ ⲧⲟⲩⲉⲓ ⲛⲧⲉ <text:line-break/><text:span text:style-name="T1"> </text:span><text:span text:style-name="T2">(11/19) </text:span> [ ]. ⲛ ⲟⲩⲟⲉⲓⲛ ⲉⲧ‐ <text:line-break/><text:span text:style-name="T1"> </text:span><text:span text:style-name="T2">(11/20) </text:span> [ ]ⲣⲟⲩ· ⲙⲛ ⲧⲏ ⲙⲉⲛ <text:line-break/><text:soft-page-break/><text:span text:style-name="T1"> </text:span><text:span text:style-name="T2">(11/21) </text:span> [ ]ⲛ ⲧⲏⲣⲥ ⲙⲛ ⲧⲏ <text:line-break/><text:span text:style-name="T1"> </text:span><text:span text:style-name="T2">(11/22) </text:span> [ ]. ⲁⲩⲱ ⲟⲩ‐ <text:line-break/><text:span text:style-name="T1"> </text:span><text:span text:style-name="T2">(11/23) </text:span> [ ] ⲙⲛ ⲧⲏ <text:line-break/><text:span text:style-name="T1"> </text:span><text:span text:style-name="T2">(11/24) </text:span> [ ] ⲧ̣ⲏ ⲉⲧⲉ <text:line-break/><text:span text:style-name="T1"> </text:span><text:span text:style-name="T2">(11/25) </text:span> [ ] ⲧⲏ <text:line-break/><text:span text:style-name="T1"> </text:span><text:span text:style-name="T2">(11/26) </text:span> [ ]. <text:line-break/><text:span text:style-name="T1"> </text:span><text:span text:style-name="T2">(11/27) </text:span> [.........]ⲩⲛ.[......]ⲏ̣ⲧⲉ <text:line-break/><text:span text:style-name="T1"> </text:span><text:span text:style-name="T2">(11/28) </text:span> [.......]ⲏ̣ⲥⲓⲥ· [.......].ⲉ <text:line-break/><text:span text:style-name="T1"> </text:span><text:span text:style-name="T2">(11/29) </text:span> ⲛⲧⲉ ⲧⲙⲉⲧⲁⲛⲟⲓⲁ· ϩ[ⲉⲛ ⲯ]ⲩⲭⲏ <text:line-break/><text:span text:style-name="T1"> </text:span><text:span text:style-name="T2">(12/1) </text:span> ⲕⲁⲧⲁ ϯϭⲟⲙ ⲉⲧⲛ[ⲧⲁⲩ ⲛϩⲏⲧ]ⲟⲩ ⲛ‐ <text:line-break/><text:span text:style-name="T1"> </text:span><text:span text:style-name="T2">(12/2) </text:span> ⲥⲉⲁϩⲉⲣⲁ[ⲧⲟ]ⲩ· ⲁⲩ[..].[.......].[..] <text:line-break/><text:span text:style-name="T1"> </text:span><text:span text:style-name="T2">(12/3) </text:span> ⲑⲉⲃⲓⲏⲟⲩ ϣⲁⲩⲣ ⲅⲩⲙⲛⲁ[ⲍⲉ] ⲙ[ⲙ]ⲟ̣ⲟⲩ <text:line-break/><text:span text:style-name="T1"> </text:span><text:span text:style-name="T2">(12/4) </text:span> ⲉⲃ̣ⲟ̣[ⲗ] ϩⲓⲧⲟⲟⲧⲟⲩ ⲛ ⲛⲓⲁⲛⲧ[ⲓ]ⲧⲩⲡⲟⲥ <text:line-break/><text:span text:style-name="T1"> </text:span><text:span text:style-name="T2">(12/5) </text:span> ⲛⲏ ⲉⲧⲉ ϣⲁⲩϫⲓ ⲛ ⲟⲩⲧⲩⲡⲟⲥ ⲛⲧⲉ <text:line-break/><text:span text:style-name="T1"> </text:span><text:span text:style-name="T2">(12/6) </text:span> ⲛⲉⲩⲯⲩⲭⲏ ⲉⲧⲓ ⲉⲩϣⲟⲟⲡ’ ϩⲙ ⲡⲕⲟ‐ <text:line-break/><text:span text:style-name="T1"> </text:span><text:span text:style-name="T2">(12/7) </text:span> ⲥⲙⲟⲥ ⲙⲛⲛⲥⲁ ϯϩⲓⲏ ⲛ ⲉⲓ ⲉⲃⲟⲗ ⲕⲁ‐ <text:line-break/><text:span text:style-name="T1"> </text:span><text:span text:style-name="T2">(12/8) </text:span> ⲧⲁ ⲡⲟⲩⲁ ⲡⲟⲩⲁ ⲛⲧⲉ ⲛⲓⲉⲱⲛ ϣⲁⲩ‐ <text:line-break/><text:span text:style-name="T1"> </text:span><text:span text:style-name="T2">(12/9) </text:span> ϣⲱⲡⲉ ⲁⲩⲱ ϣⲁⲩⲟⲩⲟⲧ[ⲃ]ⲟ̣ⲩ ⲉⲃⲟⲗ <text:line-break/><text:span text:style-name="T1"> </text:span><text:span text:style-name="T2">(12/10) </text:span> ⲕⲁⲧⲁ ⲡⲟⲩⲁ ⲡⲟⲩⲁ ⲉⲃⲟⲗ ⲙ[ⲉ]ⲛ ϩⲙ ⲡⲓⲁⲛ‐ <text:line-break/><text:span text:style-name="T1"> </text:span><text:span text:style-name="T2">(12/11) </text:span> ⲧⲓⲧⲩⲡⲟⲛ ⲛⲧⲉ ϯⲡⲁⲣⲟ̣ⲓⲕ̣[ⲏ]ⲥⲓⲥ ⲉϩⲣⲁⲓ̈ <text:line-break/><text:span text:style-name="T1"> </text:span><text:span text:style-name="T2">(12/12) </text:span> ⲉ ϯⲟⲛⲧⲱⲥ ⲉⲧ’ϣ[ⲟⲟⲡ’ ⲙ] ⲡⲁⲣⲟⲓⲕⲏ̅ <text:line-break/><text:span text:style-name="T1"> </text:span><text:span text:style-name="T2">(12/13) </text:span> ⲥⲓⲥ· ⲉⲃⲟⲗ ⲙⲉⲛ ϩⲙ ⲡⲓⲁ[ⲛ]ⲧⲓⲧⲩⲡⲟⲛ ⲙ <text:line-break/><text:span text:style-name="T1"> </text:span><text:span text:style-name="T2">(12/14) </text:span> ⲙⲉⲧⲁⲛⲟⲓⲁ ⲉϩⲣⲁⲓ̈ ⲉ ϯ[ⲟⲛ]ⲧ̣ⲱⲥ ⲉ[ⲧ’]ϣⲟ‐ <text:line-break/><text:span text:style-name="T1"> </text:span><text:span text:style-name="T2">(12/15) </text:span> ⲟⲡ’ ⲙ ⲙⲉⲧⲁⲛⲟⲓⲁ [ⲁⲩⲱ ⲉ]ⲃⲟ̣ⲗ ϩ̣[ⲙ ⲡⲓ]ⲁ̣ⲛ̣‐ <text:line-break/><text:span text:style-name="T1"> </text:span><text:span text:style-name="T2">(12/16) </text:span> ⲧⲓⲧⲩⲡⲟⲥ ⲛ ⲁⲩⲧ̣ⲟ[ⲅⲉⲛⲏⲥ] ⲉ[ϩⲣⲁⲓ̈ ⲉ ⲡⲓ]‐ <text:line-break/><text:span text:style-name="T1"> </text:span><text:span text:style-name="T2">(12/17) </text:span> ⲟⲛⲧⲱⲥ ⲉⲧ’ϣⲟ[ⲟ]ⲡ’̣ [ⲛ ⲁⲩⲧ]ⲟ̣ⲅ̣[ⲉⲛⲏⲥ] <text:line-break/><text:span text:style-name="T1"> </text:span><text:span text:style-name="T2">(12/18) </text:span> ⲙⲛ ⲛⲓⲕⲉϣⲱϫⲡ [ <text:line-break/><text:span text:style-name="T1"> </text:span><text:span text:style-name="T2">(12/19) </text:span> ⲛⲓⲯⲩⲭⲏ ⲙⲉⲛ ⲛ .[ <text:line-break/><text:span text:style-name="T1"> </text:span><text:span text:style-name="T2">(12/20) </text:span> ϣⲟⲟⲡ’ ϩⲛ ⲟⲩ.[ <text:line-break/><text:span text:style-name="T1"> </text:span><text:span text:style-name="T2">(12/21) </text:span> ⲟⲩ ⲧⲏⲣⲟⲩ ϩⲓ̣[ ⲛⲓⲁⲛⲧⲓ] <text:line-break/><text:span text:style-name="T1"> </text:span><text:span text:style-name="T2">(12/22) </text:span> ⲧⲩⲡⲟⲥ ⲛⲛ ⲉⲱ̣[ⲛ <text:line-break/><text:span text:style-name="T1"> </text:span><text:span text:style-name="T2">(12/23) </text:span> ⲛⲁⲩ ⲙⲉⲛ ϩⲟⲧ[ <text:line-break/><text:span text:style-name="T1"> </text:span><text:span text:style-name="T2">(12/24) </text:span> ⲁⲩⲱ ϩⲩ[ <text:line-break/><text:span text:style-name="T1"> </text:span><text:span text:style-name="T2">(12/25) </text:span> ⲉⲃⲟⲗ ϩ[ <text:line-break/><text:span text:style-name="T1"> </text:span><text:span text:style-name="T2">(12/26) </text:span> ⲡⲓϣⲁⲩ̣[ <text:line-break/><text:span text:style-name="T1"> </text:span><text:span text:style-name="T2">(12/27) </text:span> ⲥⲁⲃⲟ̣ⲗ̣[ <text:line-break/><text:span text:style-name="T1"> </text:span><text:span text:style-name="T2">(12/28) </text:span> ⲟⲉ.[ <text:line-break/><text:span text:style-name="T1"> </text:span><text:span text:style-name="T2">(12/29) </text:span> ⲛⲁⲉ[........] ⲉⲃ[ <text:line-break/><text:span text:style-name="T1"> </text:span><text:span text:style-name="T2">(12/30) </text:span> ⲛⲧⲉ̣[.......] ⲛ ϣⲱ̣[........ <text:line-break/><text:span text:style-name="T1"> </text:span><text:span text:style-name="T2">(12/31) </text:span> ⲛⲁⲓ̈ [ ]ⲟ̣ⲛⲉ̣[. <text:line-break/><text:span text:style-name="T1"> </text:span><text:span text:style-name="T2">(13/1) </text:span> ⲥⲙ[ⲟⲩ ⲉ ⲡⲛ]ⲟⲩⲧⲉ ⲉⲧ’ⲥⲁϩⲣⲁⲓ̈ ⲛ <text:line-break/><text:span text:style-name="T1"> </text:span><text:span text:style-name="T2">(13/2) </text:span> ⲛⲓⲛ[ⲟϭ ⲛⲛ] ⲉⲱⲛ ⲙⲛ̣ ⲡⲓⲕ̅ⲗ̅ⲥ̅ ⲛⲛ ⲁ‐ <text:line-break/><text:span text:style-name="T1"> </text:span><text:span text:style-name="T2">(13/3) </text:span> [ⲧ]ⲙ[ⲓⲥⲉ] ⲙ̣ⲛ ⲡⲓⲡⲣⲱⲧⲟⲫⲁ[ⲛ]ⲏ̣ⲥ <text:line-break/><text:span text:style-name="T1"> </text:span><text:span text:style-name="T2">(13/4) </text:span> ⲛ ⲛⲟ̣[ϭ ⲛ] ϩⲟⲟⲩⲧ’ ⲙⲛ ⲡⲓⲧⲉⲗⲓⲟⲥ <text:line-break/><text:span text:style-name="T1"> </text:span><text:span text:style-name="T2">(13/5) </text:span> ⲛ ⲁ[ⲗⲟ]ⲩ̣ ⲡⲏ ⲉⲧ’ϫⲟⲥⲉ ⲉ ⲛⲟⲩⲧⲉ <text:line-break/><text:span text:style-name="T1"> </text:span><text:span text:style-name="T2">(13/6) </text:span> ⲙⲛ ⲡⲓⲃⲁⲗ ⲛⲧⲁϥ ⲡ̣̅̅ⲓ̣̅̅ⲅ̣̅̅ⲉ̅ⲣ̅ⲁ̅ⲇ̅ⲁ̅ⲙ̅ⲁ̅ <text:line-break/><text:span text:style-name="T1"> </text:span><text:span text:style-name="T2">(13/7) </text:span> ⲁⲩⲱ ⲁⲉⲓⲙⲟⲩⲧⲉ ⲉϩⲣⲁⲓ̈ ⲟⲩⲉ ⲡⲁ‐ <text:line-break/><text:soft-page-break/><text:span text:style-name="T1"> </text:span><text:span text:style-name="T2">(13/8) </text:span> ⲗⲟⲩ ⲛⲧⲉ ⲡⲁⲗⲟⲩ ⲏ̅ⲫ̅ⲏ̅ⲥ̅ⲏ̅ⲭ̅ ⲁϥⲁϩⲉ‐ <text:line-break/><text:span text:style-name="T1"> </text:span><text:span text:style-name="T2">(13/9) </text:span> ⲣⲁⲧϥ ⲛ̣ⲁⲓ̈ ⲁⲩⲱ ⲡⲉϫⲁϥ ϫⲉ ⲡⲁⲅⲅⲉ‐ <text:line-break/><text:span text:style-name="T1"> </text:span><text:span text:style-name="T2">(13/10) </text:span> ⲗⲟⲥ ⲛⲧ̣ⲉ ⲡⲛⲟ̣ⲩⲧⲉ ⲡⲓϣⲏⲣⲉ ⲛⲧⲉ <text:line-break/><text:span text:style-name="T1"> </text:span><text:span text:style-name="T2">(13/11) </text:span> ⲡⲓⲱⲧ’̣ [ⲡⲉ ⲁⲛⲟ]ⲕ ⲡⲓⲧⲉⲗⲓⲟⲥ ⲛ ⲣⲱ‐ <text:line-break/><text:span text:style-name="T1"> </text:span><text:span text:style-name="T2">(13/12) </text:span> ⲙⲉ ⲉⲧⲃ[ⲉ ⲟⲩ] ⲕⲙⲟⲩⲧⲉ ⲉⲣⲟⲉⲓ ⲁⲩⲱ <text:line-break/><text:span text:style-name="T1"> </text:span><text:span text:style-name="T2">(13/13) </text:span> ⲕ̣ⲕⲱ[ⲧⲉ ⲛⲥ]ⲁ ⲛⲏ ⲉⲧⲕⲉⲓⲙ[ⲉ] ⲉⲣⲟⲟⲩ <text:line-break/><text:span text:style-name="T1"> </text:span><text:span text:style-name="T2">(13/14) </text:span> ⲉⲕ[ⲉ] ⲛ [ⲛⲁⲧⲙⲙ]ⲉ ⲉⲣⲟⲟⲩ· ⲁⲛⲟⲕ <text:line-break/><text:span text:style-name="T1"> </text:span><text:span text:style-name="T2">(13/15) </text:span> [ⲇⲉ] ⲡⲉ̣[ϫⲁⲓ̈ ϫⲉ] ⲁ̣ⲓ̈ⲕⲱⲧⲉ ⲛⲥⲁ ⲡⲓⲙⲟ‐ <text:line-break/><text:span text:style-name="T1"> </text:span><text:span text:style-name="T2">(13/16) </text:span> [ⲟⲩ]ϫϭ̣ [.......] ϥϫⲱⲕ ⲁⲩⲱ ϥϯ <text:line-break/><text:span text:style-name="T1"> </text:span><text:span text:style-name="T2">(13/17) </text:span> [ ]ϫⲉ ⲟⲩⲛ ϭⲟⲙ ⲉⲧⲛ‐ <text:line-break/><text:span text:style-name="T1"> </text:span><text:span text:style-name="T2">(13/18) </text:span> [ⲧⲁ%1 ]ⲉⲧⲛϫⲓ ϫⲱⲕⲙ ⲉⲣⲟ‐ <text:line-break/><text:span text:style-name="T1"> </text:span><text:span text:style-name="T2">(13/19) </text:span> [ ⲛ]ⲉⲓ̈ⲣⲁⲛ ⲥⲉϣⲉ‐ <text:line-break/><text:span text:style-name="T1"> </text:span><text:span text:style-name="T2">(13/20) </text:span> [ⲃⲓⲏⲟⲩⲧ’ ] ⲁⲩⲱ ⲉⲧⲃⲉ ⲟⲩ <text:line-break/><text:span text:style-name="T1"> </text:span><text:span text:style-name="T2">(13/21) </text:span> [ ].ⲟⲩⲧ’ ⲉ ⲛⲉⲩ‐ <text:line-break/><text:span text:style-name="T1"> </text:span><text:span text:style-name="T2">(13/22) </text:span> [ ]ⲟⲥ̣[..]ⲛⲉ ϩⲛ ϯ‐ <text:line-break/><text:span text:style-name="T1"> </text:span><text:span text:style-name="T2">(13/23) </text:span> [........ ⲉ]ⲃⲟⲗ [ϩⲛ ϩⲉ]ⲛⲕⲟⲟⲩⲉ <text:line-break/><text:span text:style-name="T1"> </text:span><text:span text:style-name="T2">(13/24) </text:span> [ ] ⲛ̣ⲓⲣⲱⲙⲉ· <text:line-break/><text:span text:style-name="T1"> </text:span><text:span text:style-name="T2">(13/25) </text:span> [ ϣ]ⲉⲃⲓ‐ <text:line-break/><text:span text:style-name="T1"> </text:span><text:span text:style-name="T2">(13/26) </text:span> [ⲏⲟⲩⲧ’ ]ⲩ· <text:line-break/><text:span text:style-name="T1"> </text:span><text:span text:style-name="T2">(13/27) </text:span> [ ]ⲉ <text:line-break/><text:span text:style-name="T1"> </text:span><text:span text:style-name="T2">(13/28) </text:span> [ ]ⲣ <text:line-break/><text:span text:style-name="T1"> </text:span><text:span text:style-name="T2">(14/1) </text:span> ⲉϥϫⲱ ⲙⲙⲟⲥ ϫⲉ̣ [ⲍ̅ⲱ̅ⲥ̅ⲧ̅]̅ⲣ̅ⲓ̅ⲁ̅ⲛ̅ⲉ̅ <text:line-break/><text:span text:style-name="T1"> </text:span><text:span text:style-name="T2">(14/2) </text:span> ⲥⲱⲧⲙ ⲉⲧⲃⲉ ⲛⲁⲓ̣̈ [......] ϣⲟ‐ <text:line-break/><text:span text:style-name="T1"> </text:span><text:span text:style-name="T2">(14/3) </text:span> ⲙⲧ’ ⲅⲁⲣ ⲛⲉ ⲛⲓϣⲟⲣⲡ’̣ [.......]ⲙ̣ <text:line-break/><text:span text:style-name="T1"> </text:span><text:span text:style-name="T2">(14/4) </text:span> ⲛ̣ ⲁ̣[ⲣ]ⲭⲏ· ⲉⲁⲩⲟⲩⲱⲛ[ϩ ⲉ]ⲃ̣ⲟⲗ ϩⲛ <text:line-break/><text:span text:style-name="T1"> </text:span><text:span text:style-name="T2">(14/5) </text:span> ⲟⲩⲁⲣⲭⲏ ⲛ ⲟⲩⲱⲧ’ ⲛⲧ[...] ⲡⲓⲉ‐ <text:line-break/><text:span text:style-name="T1"> </text:span><text:span text:style-name="T2">(14/6) </text:span> ⲱⲛ ⲛ ⲃ̅ⲁ̅ⲣ̅ⲃ̣̅̅ⲏ̣̅̅ⲗ̅ⲱ̅ ⲙ ⲡⲣⲏⲧⲉ ⲛ ϩⲉⲛ‐ <text:line-break/><text:span text:style-name="T1"> </text:span><text:span text:style-name="T2">(14/7) </text:span> ⲁⲣⲭⲏ ⲁⲛ ⲙⲛ ϩⲉⲛϭ̣ⲟⲙ ⲟⲩⲇⲉ ⲙ <text:line-break/><text:span text:style-name="T1"> </text:span><text:span text:style-name="T2">(14/8) </text:span> ⲡⲣⲏⲧⲉ ⲁⲛ ⲉⲃⲟⲗ ϩⲛ ⲟⲩⲁⲣⲭⲏ ⲙⲛ <text:line-break/><text:span text:style-name="T1"> </text:span><text:span text:style-name="T2">(14/9) </text:span> ⲟⲩϭⲟⲙ· ⲉⲁⲩⲟⲩⲱⲛϩ ⲉ[ⲃ]ⲟⲗ ⲛ ⲁⲣ‐ <text:line-break/><text:span text:style-name="T1"> </text:span><text:span text:style-name="T2">(14/10) </text:span> ⲭⲏ ⲛⲓⲙ ⲁⲩⲱ ⲁⲩ̣ϯ ϭⲟⲙ ⲛ̣ ϭⲟⲙ ⲛⲓⲙ <text:line-break/><text:span text:style-name="T1"> </text:span><text:span text:style-name="T2">(14/11) </text:span> ⲁⲩⲱ ⲉⲁⲩⲟⲩⲱⲛ̣[ϩ ⲉⲃⲟⲗ ϩ]ⲙ ⲡⲏ ⲉⲧ’‐ <text:line-break/><text:span text:style-name="T1"> </text:span><text:span text:style-name="T2">(14/12) </text:span> ⲥⲟⲧⲡ’ ⲉⲣⲟⲟⲩ ⲛϩ[ⲟⲩⲟ] ⲉⲧⲉ ⲛⲁⲓ̈ ⲛⲉ <text:line-break/><text:span text:style-name="T1"> </text:span><text:span text:style-name="T2">(14/13) </text:span> ϯϩⲩⲡⲁⲣⲝⲓⲥ ⲙⲛ [ϯⲙⲛ]ⲧ’ⲙⲁⲕ[ⲁⲣ]ⲓ̣ⲟⲥ <text:line-break/><text:span text:style-name="T1"> </text:span><text:span text:style-name="T2">(14/14) </text:span> ⲁⲩⲱ ⲡⲓⲱⲛϩ· ⲛⲓ̣[.....]ⲟⲩ[... <text:line-break/><text:span text:style-name="T1"> </text:span><text:span text:style-name="T2">(14/15) </text:span> ⲃⲟⲗ ⲙⲛ ⲛⲉⲩⲉ[ⲣⲏⲩ ....]ⲩⲱ̣[.. <text:line-break/><text:span text:style-name="T1"> </text:span><text:span text:style-name="T2">(14/16) </text:span> ⲉⲃⲟⲗ ϩⲛ ⲟⲩⲁ.[ <text:line-break/><text:span text:style-name="T1"> </text:span><text:span text:style-name="T2">(14/17) </text:span> ⲁⲩⲱ ⲉⲧⲃⲉ ⲡ[ <text:line-break/><text:span text:style-name="T1"> </text:span><text:span text:style-name="T2">(14/18) </text:span> ⲉⲁⲩϯ ⲣⲁⲛ ⲉ .[ <text:line-break/><text:span text:style-name="T1"> </text:span><text:span text:style-name="T2">(14/19) </text:span> ϩⲟⲩⲟ ⲛ ⲧⲁ[ <text:line-break/><text:span text:style-name="T1"> </text:span><text:span text:style-name="T2">(14/20) </text:span> ⲱⲧ’ ⲁⲩⲱ ϩⲉ[ <text:line-break/><text:span text:style-name="T1"> </text:span><text:span text:style-name="T2">(14/21) </text:span> ⲟⲩⲧⲉⲗⲓⲟⲥ [ <text:line-break/><text:span text:style-name="T1"> </text:span><text:span text:style-name="T2">(14/22) </text:span> ⲉⲃⲟⲗ ϩ̣[ⲛ ⲟ]ⲩⲁ[ <text:line-break/><text:span text:style-name="T1"> </text:span><text:span text:style-name="T2">(14/23) </text:span> ⲉⲟⲩ[...]..[ <text:line-break/><text:span text:style-name="T1"> </text:span><text:span text:style-name="T2">(14/24) </text:span> ⲟⲩⲁⲉ̣[ <text:line-break/><text:span text:style-name="T1"> </text:span><text:span text:style-name="T2">(14/25) </text:span> ⲧ.[ <text:line-break/><text:span text:style-name="T1"> </text:span><text:span text:style-name="T2">(14/26) </text:span> ⲉ[ <text:line-break/><text:soft-page-break/><text:span text:style-name="T1"> </text:span><text:span text:style-name="T2">(14/27) </text:span> ϭ[ <text:line-break/><text:span text:style-name="T1"> </text:span><text:span text:style-name="T2">(14/28) </text:span> ⲛ[ <text:line-break/><text:span text:style-name="T1"> </text:span><text:span text:style-name="T2">(15/1) </text:span> ⲁⲩⲱ̣ [.....] ⲛϭⲓ ⲟⲩⲙⲟⲟⲩ ⲛ̣ⲧⲉ <text:line-break/><text:span text:style-name="T1"> </text:span><text:span text:style-name="T2">(15/2) </text:span> ⲧⲟ̣ⲩ[ⲉⲓ ⲧⲟⲩ]ⲉⲓ ⲙⲙⲟⲟⲩ̣ ⲉⲧⲃⲉ ⲡⲁⲓ̈ <text:line-break/><text:span text:style-name="T1"> </text:span><text:span text:style-name="T2">(15/3) </text:span> ϩ̣[.....] ⲙ̣ⲙⲟⲟⲩ ⲛⲉ ⲛ ⲧⲉⲗⲓⲟ̣ⲥ ⲛ̣ⲉ· <text:line-break/><text:span text:style-name="T1"> </text:span><text:span text:style-name="T2">(15/4) </text:span> ⲡⲓⲙ[ⲟⲟ]ⲩ ⲛⲧⲉ ⲡⲱⲛϩ ⲉⲧⲉ ⲡⲁϯ‐ <text:line-break/><text:span text:style-name="T1"> </text:span><text:span text:style-name="T2">(15/5) </text:span> ⲙⲛⲧ’̣ⲱⲛ̣ϩ ⲡⲉ· ⲡⲏ ϯⲛⲟⲩ ⲉⲧⲁⲕ‐ <text:line-break/><text:span text:style-name="T1"> </text:span><text:span text:style-name="T2">(15/6) </text:span> ϫⲓ ϫⲱⲕⲙ ⲉⲣⲟϥ ϩⲙ ⲡⲓⲁⲩⲧⲟⲅⲉⲛⲏⲥ· <text:line-break/><text:span text:style-name="T1"> </text:span><text:span text:style-name="T2">(15/7) </text:span> ⲡ[ⲓⲙⲟⲟⲩ ⲇⲉ ⲛ]ⲧⲉ ϯⲙⲛⲧ’ⲙⲁⲕⲁⲣⲓ‐ <text:line-break/><text:span text:style-name="T1"> </text:span><text:span text:style-name="T2">(15/8) </text:span> ⲟⲥ ⲉⲧ̣[ⲉ ⲡⲁ]ⲡⲥⲟⲟⲩⲛ ⲡⲉ· ⲡⲏ ⲉⲧⲕ‐ <text:line-break/><text:span text:style-name="T1"> </text:span><text:span text:style-name="T2">(15/9) </text:span> ⲛⲁϫ[ⲓ ϫⲱ]ⲕⲙ ⲉⲣⲟϥ ϩⲙ ⲡⲓⲡⲣⲱⲧⲟ‐ <text:line-break/><text:span text:style-name="T1"> </text:span><text:span text:style-name="T2">(15/10) </text:span> ⲫⲁⲛ̣[ⲏⲥ·] ⲡ̣ⲓ̣ⲙ̣ⲟⲟⲩ ⲇⲉ ⲛⲧⲉ ϯϩⲩ‐ <text:line-break/><text:span text:style-name="T1"> </text:span><text:span text:style-name="T2">(15/11) </text:span> ⲡⲁⲣⲝ̣[ⲓⲥ ⲉⲧ]ⲉ ⲡ̣ⲁϯⲙⲛⲧ’ⲛⲟⲩⲧⲉ <text:line-break/><text:span text:style-name="T1"> </text:span><text:span text:style-name="T2">(15/12) </text:span> ⲡ̣ⲉ ⲉⲧ[ⲉ ⲡ]ⲁⲡⲓⲕⲁⲗⲩⲡⲧⲟⲥ ⲡⲉ· <text:line-break/><text:span text:style-name="T1"> </text:span><text:span text:style-name="T2">(15/13) </text:span> ⲁ̣ⲩⲱ̣ ϥ[ϣⲟⲟⲡ] ⲛ̣ϭⲓ ⲡⲓⲙⲟⲟⲩ ⲛⲧⲉ <text:line-break/><text:span text:style-name="T1"> </text:span><text:span text:style-name="T2">(15/14) </text:span> [ⲡⲓ]ⲱⲛ̣[ϩ...] ⲟ̣ⲩϭⲟⲙ· ⲡⲁϯⲙⲛⲧ’‐ <text:line-break/><text:span text:style-name="T1"> </text:span><text:span text:style-name="T2">(15/15) </text:span> [ⲙⲁ]ⲕⲁ̣[ⲣⲓⲟⲥ] ⲕ]ⲁⲧⲁ ⲟⲩⲥⲓⲁ· ⲡⲁ‐ <text:line-break/><text:span text:style-name="T1"> </text:span><text:span text:style-name="T2">(15/16) </text:span> [ϯⲙⲛⲧ’ⲛⲟⲩⲧⲉ] ⲇⲉ ⲕⲁⲧⲁ ⲟⲩϩⲩ‐ <text:line-break/><text:span text:style-name="T1"> </text:span><text:span text:style-name="T2">(15/17) </text:span> [ⲡⲁⲣⲝⲓⲥ ⲛⲁⲓ̈ ⲧ]ⲏⲣⲟⲩ ⲇⲉ ϩⲉⲛⲉⲓ‐ <text:line-break/><text:span text:style-name="T1"> </text:span><text:span text:style-name="T2">(15/18) </text:span> [ ⲙ]ⲛⲧ’ϭⲟⲙ ⲙⲛ ϩⲉ̅‐ <text:line-break/><text:span text:style-name="T1"> </text:span><text:span text:style-name="T2">(15/19) </text:span> [ ]ⲩ ⲛⲉⲧⲉ ϣⲁⲩ‐ <text:line-break/><text:span text:style-name="T1"> </text:span><text:span text:style-name="T2">(15/20) </text:span> [ ]ⲙⲟⲟⲩ ⲉⲧ’ⲧⲃ‐ <text:line-break/><text:span text:style-name="T1"> </text:span><text:span text:style-name="T2">(15/21) </text:span> [ⲃⲟ ]ⲩ.[..] ⲡⲉ ϩⲱ <text:line-break/><text:span text:style-name="T1"> </text:span><text:span text:style-name="T2">(15/22) </text:span> [ ]..[....] ⲕⲁⲧⲁ <text:line-break/><text:span text:style-name="T1"> </text:span><text:span text:style-name="T2">(15/23) </text:span> [ ⲉ]ⲧⲁⲩⲃⲱⲕ <text:line-break/><text:span text:style-name="T1"> </text:span><text:span text:style-name="T2">(15/24) </text:span> [ ]ⲩⲧ’· <text:line-break/><text:span text:style-name="T1"> </text:span><text:span text:style-name="T2">(15/25) </text:span> [ ] ⲙⲙⲁⲩ <text:line-break/><text:span text:style-name="T1"> </text:span><text:span text:style-name="T2">(15/26) </text:span> [ ]ⲱ <text:line-break/><text:span text:style-name="T1"> </text:span><text:span text:style-name="T2">(15/27) </text:span> [ ]ⲙⲏ <text:line-break/><text:span text:style-name="T1"> </text:span><text:span text:style-name="T2">(15/28) </text:span> [ ] <text:line-break/><text:span text:style-name="T1"> </text:span><text:span text:style-name="T2">(16/1) </text:span> ϩⲩⲡⲁⲣⲝⲓ̣[ⲥ] ⲙ ⲡⲣ[ⲏⲧⲉ ⲉⲧϥ]ϣⲟⲟⲡ’ <text:line-break/><text:span text:style-name="T1"> </text:span><text:span text:style-name="T2">(16/2) </text:span> ⲙⲙⲟⲥ· ⲟⲩⲙⲟⲛⲟ̣[ⲛ ⲁϥⲟⲩ]ⲱϩ̣ ϩ̣ⲛ <text:line-break/><text:span text:style-name="T1"> </text:span><text:span text:style-name="T2">(16/3) </text:span> ⲟⲩⲉⲛⲛⲟⲓⲁ· ⲁⲗⲗⲁ ⲁϥ.[.....]ⲛ ⲉ‐ <text:line-break/><text:span text:style-name="T1"> </text:span><text:span text:style-name="T2">(16/4) </text:span> ⲣⲟ̣ⲟⲩ ϫⲉ ⲛⲧⲟϥ ⲡⲉ ⲡϣ[ⲱ]ⲡⲉ ⲙ ⲡⲉ‐ <text:line-break/><text:span text:style-name="T1"> </text:span><text:span text:style-name="T2">(16/5) </text:span> ⲉⲓ̣ⲣⲏⲧⲉ· ⲉⲁϥⲕⲱ ⲛ ⲟⲩ[..].ϥ ϩⲓϫⲛ <text:line-break/><text:span text:style-name="T1"> </text:span><text:span text:style-name="T2">(16/6) </text:span> ⲡⲉⲧ’ϣⲟⲟⲡ’· ϩⲓⲛⲁ ϫⲉ ⲛⲛⲉϥϣⲱⲡⲉ <text:line-break/><text:span text:style-name="T1"> </text:span><text:span text:style-name="T2">(16/7) </text:span> ⲛⲛ ⲁⲧⲛ ⲁⲣⲏϫϥ ⲁⲩ[ⲱ] ⲛ̣ [ⲁ]ⲧ’ⲙⲟⲣⲫⲏ· <text:line-break/><text:span text:style-name="T1"> </text:span><text:span text:style-name="T2">(16/8) </text:span> ⲁⲗⲗⲁ ⲉⲁⲩϫⲓⲟⲟⲣ ⲙ[ⲙⲟϥ] ⲛⲁⲙⲉ <text:line-break/><text:span text:style-name="T1"> </text:span><text:span text:style-name="T2">(16/9) </text:span> ⲉⲩⲃⲣⲣⲉ ⲡⲉ ⲉ ⲡⲧⲣⲉ[ϥϣ]ⲱⲡⲉ <text:line-break/><text:span text:style-name="T1"> </text:span><text:span text:style-name="T2">(16/10) </text:span> ⲛⲛ ⲟⲩⲗⲁⲁⲩ· ⲉⲩⲛ[ⲧⲁ%1.] ⲙ̣ⲙⲁⲩ <text:line-break/><text:span text:style-name="T1"> </text:span><text:span text:style-name="T2">(16/11) </text:span> ⲙ ⲡⲉⲧⲉ ⲡⲱϥ ⲙ [.....] ⲡ̣ⲉ ⲑⲩ‐ <text:line-break/><text:span text:style-name="T1"> </text:span><text:span text:style-name="T2">(16/12) </text:span> ⲡⲁⲣⲝⲓⲥ ⲙⲛ ⲡⲓϣ[ⲏⲣ]ⲉ ⲉϥⲁϩⲉⲣⲁ‐ <text:line-break/><text:span text:style-name="T1"> </text:span><text:span text:style-name="T2">(16/13) </text:span> ⲧϥ ⲛⲙⲙⲁϥ ⲉϥϣ[ⲓ]ⲛ[ⲉ ⲛ]ⲙ̣ⲙ̣ⲁϥ [ⲉ]ϥ‐ <text:line-break/><text:span text:style-name="T1"> </text:span><text:span text:style-name="T2">(16/14) </text:span> ⲕⲱⲧⲉ ⲉⲣⲟϥ ⲁⲩ[.....]ⲛⲉ̣ ⲙ [.]. <text:line-break/><text:span text:style-name="T1"> </text:span><text:span text:style-name="T2">(16/15) </text:span> ⲛⲥⲁ ⲥⲁ ⲛⲓⲙ· ⲉ̣[.....]ⲱ[.. <text:line-break/><text:span text:style-name="T1"> </text:span><text:span text:style-name="T2">(16/16) </text:span> ⲉⲃⲟⲗ ϩⲙ ⲡⲓⲙⲉ̣[ <text:line-break/><text:span text:style-name="T1"> </text:span><text:span text:style-name="T2">(16/17) </text:span> ϫⲓ ⲙ ⲡⲏ ⲉⲧ’ⲧ.[ <text:line-break/><text:soft-page-break/><text:span text:style-name="T1"> </text:span><text:span text:style-name="T2">(16/18) </text:span> ⲛ ϣⲟⲟⲡ’ ⲛ ⲧ[ <text:line-break/><text:span text:style-name="T1"> </text:span><text:span text:style-name="T2">(16/19) </text:span> ⲟⲩⲉⲛⲉⲣⲅⲓⲁ̣ [ <text:line-break/><text:span text:style-name="T1"> </text:span><text:span text:style-name="T2">(16/20) </text:span> ⲟⲩⲟⲛϩ· ⲉⲩⲛ[ <text:line-break/><text:span text:style-name="T1"> </text:span><text:span text:style-name="T2">(16/21) </text:span> ⲡⲉϥⲕⲉϣⲁϫ[ⲉ <text:line-break/><text:span text:style-name="T1"> </text:span><text:span text:style-name="T2">(16/22) </text:span> ⲛⲉ ⲛⲁⲓ̈ ⲛ̣ⲥ̣ⲁ .[ <text:line-break/><text:span text:style-name="T1"> </text:span><text:span text:style-name="T2">(16/23) </text:span> ⲁⲩϣ̣[ⲱⲡ]ⲉ̣ ⲙ [ <text:line-break/><text:span text:style-name="T1"> </text:span><text:span text:style-name="T2">(16/24) </text:span> ⲣⲓ ⲛⲉⲩ̣[ <text:line-break/><text:span text:style-name="T1"> </text:span><text:span text:style-name="T2">(16/25) </text:span> ⲛ.[ <text:line-break/><text:span text:style-name="T1"> </text:span><text:span text:style-name="T2">(16/26) </text:span> ⲉ[ <text:line-break/><text:span text:style-name="T1"> </text:span><text:span text:style-name="T2">(16/27) </text:span> ⲡ[ <text:line-break/><text:span text:style-name="T1"> </text:span><text:span text:style-name="T2">(16/28) </text:span> .[ <text:line-break/><text:span text:style-name="T1"> </text:span><text:span text:style-name="T2">(16/29) </text:span> ϩ[ <text:line-break/><text:span text:style-name="T1"> </text:span><text:span text:style-name="T2">(17/1) </text:span> ⲁⲩⲱ ⲥϣⲟⲟⲡ’ ⲛϭⲓ ϯϭⲟⲙ ⲙⲛ ϯ‐ <text:line-break/><text:span text:style-name="T1"> </text:span><text:span text:style-name="T2">(17/2) </text:span> ⲟⲩⲥ[ⲓⲁ] ⲙⲛ ϯϩⲩⲡⲁⲣⲝⲓⲥ ⲛⲧⲉ <text:line-break/><text:span text:style-name="T1"> </text:span><text:span text:style-name="T2">(17/3) </text:span> ⲡϣⲱ[ⲡ]ⲉ ⲉϥϣⲟⲟⲡ’[ ⲛϭⲓ ⲡⲓ̣ⲙⲟ̣[ⲟ]ⲩ· <text:line-break/><text:span text:style-name="T1"> </text:span><text:span text:style-name="T2">(17/4) </text:span> ⲡⲣⲁⲛ [ⲇ]ⲉ ⲉⲧⲉⲩϫⲱⲕⲙ ⲉⲣⲟϥ ⲟⲩ‐ <text:line-break/><text:span text:style-name="T1"> </text:span><text:span text:style-name="T2">(17/5) </text:span> ϣⲁϫⲉ ⲡⲉ ⲛⲧⲉ ⲡⲓⲙⲟⲟⲩ· ⲡⲓϣⲟ‐ <text:line-break/><text:span text:style-name="T1"> </text:span><text:span text:style-name="T2">(17/6) </text:span> ⲣⲡ’ ⲟⲩⲛ ⲙ ⲙⲟⲟⲩ ⲛ ⲧⲉⲗⲓⲟⲥ ⲛⲧⲉ <text:line-break/><text:span text:style-name="T1"> </text:span><text:span text:style-name="T2">(17/7) </text:span> ⲡⲓϣ̣ⲙⲧ’̣[ϭⲟ]ⲙ̣ [ⲙ] ⲡⲓⲁⲩⲧⲟⲅⲉⲛⲏⲥ <text:line-break/><text:span text:style-name="T1"> </text:span><text:span text:style-name="T2">(17/8) </text:span> ⲟⲩⲱⲛϩ̣ [ⲡⲉ] ⲛⲧⲉ ⲛⲓⲯⲩⲭⲏ ⲛ ⲧⲉ‐ <text:line-break/><text:span text:style-name="T1"> </text:span><text:span text:style-name="T2">(17/9) </text:span> ⲗⲓⲟⲥ· ⲟ̣[ⲩ]ϣⲁϫⲉ ⲅⲁⲣ ⲡⲉ ⲛⲧⲉ <text:line-break/><text:span text:style-name="T1"> </text:span><text:span text:style-name="T2">(17/10) </text:span> ⲡⲓⲛⲟⲩ[ⲧⲉ ⲛ] ⲧⲉⲗⲓⲟⲥ ⲙ ⲡⲧⲣⲉϥϣⲱ‐ <text:line-break/><text:span text:style-name="T1"> </text:span><text:span text:style-name="T2">(17/11) </text:span> ⲡⲉ ⲁ.[.... ⲉ]ⲧⲙⲙⲁⲩ· ⲟⲩⲡⲏⲅⲏ <text:line-break/><text:span text:style-name="T1"> </text:span><text:span text:style-name="T2">(17/12) </text:span> ⲅⲁⲣ ⲛⲧⲉ [ⲛⲁ]ⲓ̈ ⲧⲏⲣⲟⲩ ⲡⲉ ⲡⲓⲁϩⲟⲣⲁ‐ <text:line-break/><text:span text:style-name="T1"> </text:span><text:span text:style-name="T2">(17/13) </text:span> ⲧⲟⲛ ⲙ ⲡ̣̅̅[̅ⲛ̅]̅ⲁ̣̅̅ ⲉⲧⲉ ⲛⲓⲕⲟⲟⲩⲉ ϩⲉⲛ‐ <text:line-break/><text:span text:style-name="T1"> </text:span><text:span text:style-name="T2">(17/14) </text:span> ⲉⲃ̣ⲟⲗ [ϩⲛ ϯⲅⲛ]ⲱⲥⲓⲥ ⲛⲉ ⲉϩⲉⲛⲉⲓⲛⲉ <text:line-break/><text:span text:style-name="T1"> </text:span><text:span text:style-name="T2">(17/15) </text:span> ⲛ̣ⲧⲁϥ [ⲛⲉ· ⲁⲗⲗ]ⲁ̣ ⲡⲏ ⲉⲧⲙⲙⲉ ⲉⲣⲟϥ <text:line-break/><text:span text:style-name="T1"> </text:span><text:span text:style-name="T2">(17/16) </text:span> ϫⲉ̣ [.].[.....] ⲁϣ ⲛ ⲣⲏⲧⲉ ⲏ%0 ⲁϣ <text:line-break/><text:span text:style-name="T1"> </text:span><text:span text:style-name="T2">(17/17) </text:span> [ ]ⲟⲛϩ ϩⲓ ⲟⲩⲥⲟⲡ’ <text:line-break/><text:span text:style-name="T1"> </text:span><text:span text:style-name="T2">(17/18) </text:span> [ ]ⲱ̣ⲛ̣ϩ ϩⲣⲁⲓ̈ ϩⲛ ⲟⲩ‐ <text:line-break/><text:span text:style-name="T1"> </text:span><text:span text:style-name="T2">(17/19) </text:span> [ ]ⲟⲩⲛ ⲡⲉ ⲡⲓⲙⲟ‐ <text:line-break/><text:span text:style-name="T1"> </text:span><text:span text:style-name="T2">(17/20) </text:span> [ ]ⲱⲛϩ· ϩⲙ ⲡϣⲱ‐ <text:line-break/><text:span text:style-name="T1"> </text:span><text:span text:style-name="T2">(17/21) </text:span> [ ϣ]ⲱⲡ̣ⲉ̣ ⲛ̣ⲛ ⲁⲧⲛ ⲁ‐ <text:line-break/><text:span text:style-name="T1"> </text:span><text:span text:style-name="T2">(17/22) </text:span> [ⲣⲏϫϥ ] ⲡⲉϥ[....]ⲉ ⲙⲙⲓⲛ <text:line-break/><text:span text:style-name="T1"> </text:span><text:span text:style-name="T2">(17/23) </text:span> [ⲙⲙⲟϥ ]ⲱ ⲡⲣⲁⲛ <text:line-break/><text:span text:style-name="T1"> </text:span><text:span text:style-name="T2">(17/24) </text:span> [ ]ⲩⲧⲉ <text:line-break/><text:span text:style-name="T1"> </text:span><text:span text:style-name="T2">(17/25) </text:span> [ ]ⲉ̣ⲉ <text:line-break/><text:span text:style-name="T1"> </text:span><text:span text:style-name="T2">(17/26) </text:span> [ ] ⲛ <text:line-break/><text:span text:style-name="T1"> </text:span><text:span text:style-name="T2">(17/27) </text:span> [ ]ϥ <text:line-break/><text:span text:style-name="T1"> </text:span><text:span text:style-name="T2">(18/1) </text:span> ⲉϥϣⲟⲟⲡ’ ⲟⲛⲧⲱⲥ· ⲡⲏ̣ ⲡⲉ ⲉϣⲁϥ‐ <text:line-break/><text:span text:style-name="T1"> </text:span><text:span text:style-name="T2">(18/2) </text:span> ϯ ⲧⲟϣ ⲉⲣⲟϥ· ⲁⲩⲱ ⲛⲏ ⲉ̣.[ⲛ]ⲛⲏⲩ <text:line-break/><text:span text:style-name="T1"> </text:span><text:span text:style-name="T2">(18/3) </text:span> ⲉϩⲣⲁⲓ̈ ⲉ ⲡⲓⲙⲟⲟⲩ ⲕⲁⲧⲁ ⲧ[ⲉⲓ̈]ϭⲟⲙ ⲛ <text:line-break/><text:span text:style-name="T1"> </text:span><text:span text:style-name="T2">(18/4) </text:span> ⲟ[ⲩ]ⲱ̣ⲧ’ ⲙⲛ ⲡⲓⲉⲓⲛⲉ ⲛⲧ[ⲉ] ϯⲧⲁⲝⲓⲥ· <text:line-break/><text:span text:style-name="T1"> </text:span><text:span text:style-name="T2">(18/5) </text:span> ⲁⲩⲱ ⲡⲓⲡⲣⲱⲧⲟⲫⲁⲛⲏ[ⲥ] ⲛ ⲛⲟϭ ⲛ <text:line-break/><text:span text:style-name="T1"> </text:span><text:span text:style-name="T2">(18/6) </text:span> ϩⲟⲟⲩⲧ’ ⲛⲛ ⲁⲧⲛⲁⲩ ⲉⲣⲟϥ ⲛ ⲧⲉⲗⲓⲟⲥ ⲛ <text:line-break/><text:span text:style-name="T1"> </text:span><text:span text:style-name="T2">(18/7) </text:span> ⲛⲟⲩⲥ· ⲟⲩⲛⲧⲁϥ ⲙ ⲡⲉϥⲙⲟⲟⲩ ⲙⲙⲓⲛ <text:line-break/><text:span text:style-name="T1"> </text:span><text:span text:style-name="T2">(18/8) </text:span> ⲙⲙⲟϥ· ϩⲱⲥ ⲉϣⲱ̣ⲡ̣[ⲉ ⲉ]ⲕϣⲁⲛⲉⲓ ⲉ‐ <text:line-break/><text:soft-page-break/><text:span text:style-name="T1"> </text:span><text:span text:style-name="T2">(18/9) </text:span> ϫⲛ ⲡⲉϥⲧⲟⲡⲟⲥ ⲉⲕ[ⲛⲁⲛⲁ]ⲩ̣ ⲉⲣⲟϥ ⲙ ⲡⲉⲓ̈‐ <text:line-break/><text:span text:style-name="T1"> </text:span><text:span text:style-name="T2">(18/10) </text:span> ⲣⲏⲧⲉ ⲟⲛ ⲡⲉ ⲡⲉⲓ̈ⲕ̅ⲗ̅ⲥ̅ [ⲛⲛ] ⲁⲧⲙⲓⲥⲉ· <text:line-break/><text:span text:style-name="T1"> </text:span><text:span text:style-name="T2">(18/11) </text:span> ⲕⲁⲧⲁ ⲡⲟⲩⲁ ⲡⲟⲩⲁ ⲇ[ⲉ ϥ]ϣⲟ̣ⲟⲡ’ ⲛϭⲓ <text:line-break/><text:span text:style-name="T1"> </text:span><text:span text:style-name="T2">(18/12) </text:span> ⲟⲩⲙⲉⲣⲓⲕⲟⲛ ⲙⲛ̣ [ⲟⲩϣⲟ]ⲣⲡ’ ⲛ ⲉⲓⲇⲟⲥ <text:line-break/><text:span text:style-name="T1"> </text:span><text:span text:style-name="T2">(18/13) </text:span> ϩⲓⲛⲁ ϫⲉ ⲉⲩⲉϫⲱⲕ ⲙ [ⲡ]ⲓ̣̈ⲣⲏⲧⲉ· ⲛⲓ‐ <text:line-break/><text:span text:style-name="T1"> </text:span><text:span text:style-name="T2">(18/14) </text:span> ⲁⲩⲧⲟⲅⲉⲛⲓⲟⲛ ⲅⲁⲣ [ⲛⲛ] ⲉⲱⲛ ϥⲧ̣ⲟ‐ <text:line-break/><text:span text:style-name="T1"> </text:span><text:span text:style-name="T2">(18/15) </text:span> ⲟⲩ ⲛⲉ ⲛ ⲧⲉⲗⲓⲟ[ⲥ ⲛⲓ]ⲕⲁⲧⲁ ⲟⲩ[ⲁ] ⲛ̣‐ <text:line-break/><text:span text:style-name="T1"> </text:span><text:span text:style-name="T2">(18/16) </text:span> ⲧⲉ ⲛⲓⲡⲁⲛⲧⲉⲗⲓⲟ̣ⲥ̣ [..ϣⲟ]ⲟⲡ’̣ [.. <text:line-break/><text:span text:style-name="T1"> </text:span><text:span text:style-name="T2">(18/17) </text:span> ⲛⲁⲓ̈ ⲛ ⲛⲓⲕⲁⲧⲁ ⲟ̣[ⲩⲁ ⲛ ⲧⲉ]ⲗ̣ⲓⲟⲥ· ⲡ[ⲓ]‐ <text:line-break/><text:span text:style-name="T1"> </text:span><text:span text:style-name="T2">(18/18) </text:span> ϯⲟⲩ ⲇⲉ ⲛⲛ ⲉⲱ[ⲛ......] ⲙ̣ⲙ[ <text:line-break/><text:span text:style-name="T1"> </text:span><text:span text:style-name="T2">(18/19) </text:span> ⲙ ⲡⲓⲁⲩⲧⲟⲅⲉⲛ[ⲏⲥ <text:line-break/><text:span text:style-name="T1"> </text:span><text:span text:style-name="T2">(18/20) </text:span> ⲧⲏⲣⲟⲩ ⲅⲁⲣ ϩⲉ̣ⲛ̣[ <text:line-break/><text:span text:style-name="T1"> </text:span><text:span text:style-name="T2">(18/21) </text:span> ϩⲟⲟⲩⲧ’ ⲛ ⲧ.[ <text:line-break/><text:span text:style-name="T1"> </text:span><text:span text:style-name="T2">(18/22) </text:span> ⲛⲓⲡⲧⲏⲣϥ ⲅⲁ[ⲣ ⲧⲉ]‐ <text:line-break/><text:span text:style-name="T1"> </text:span><text:span text:style-name="T2">(18/23) </text:span> ⲗⲓⲟⲥ ⲛ ⲛⲟⲩ[ⲧⲉ ⲡⲓϣⲟ]‐ <text:line-break/><text:span text:style-name="T1"> </text:span><text:span text:style-name="T2">(18/24) </text:span> ⲙⲧ’ ⲛ [ϩⲟⲟ]ⲩⲧ’̣ [ <text:line-break/><text:span text:style-name="T1"> </text:span><text:span text:style-name="T2">(18/25) </text:span> ⲕⲁⲧⲁ̣ [ⲟⲩ]ⲁ̣ ⲛ [ⲧⲉⲗⲓⲟⲥ <text:line-break/><text:span text:style-name="T1"> </text:span><text:span text:style-name="T2">(18/26) </text:span> ϩⲙ ⲡ[ <text:line-break/><text:span text:style-name="T1"> </text:span><text:span text:style-name="T2">(18/27) </text:span> ⲫ[ <text:line-break/><text:span text:style-name="T1"> </text:span><text:span text:style-name="T2">(18/28) </text:span> ⲉ[ <text:line-break/><text:span text:style-name="T1"> </text:span><text:span text:style-name="T2">(18/29) </text:span> .[ <text:line-break/><text:span text:style-name="T1"> </text:span><text:span text:style-name="T2">(18/30) </text:span> .[ <text:line-break/><text:span text:style-name="T1"> </text:span><text:span text:style-name="T2">(18/31) </text:span> .[ <text:line-break/><text:span text:style-name="T1"> </text:span><text:span text:style-name="T2">(19/1) </text:span> ⲧⲉⲗⲓⲟⲥ· ⲛⲏ ⲉⲧ’ϣⲟⲟⲡ’ ⲕⲁⲧ[ⲁ ⲟ]ⲩ‐ <text:line-break/><text:span text:style-name="T1"> </text:span><text:span text:style-name="T2">(19/2) </text:span> ⲉⲓ̣ⲇⲟⲥ̣ ⲙⲛ ⲟⲩⲅⲉⲛⲟⲥ· ⲁⲩ[ⲱ] ⲟⲩ‐ <text:line-break/><text:span text:style-name="T1"> </text:span><text:span text:style-name="T2">(19/3) </text:span> ⲧⲏⲣϥ̣ ⲙⲛ ⲟⲩⲇⲓⲁⲫⲟⲣⲁ [ⲙ ⲙ]ⲉⲣⲓ‐ <text:line-break/><text:span text:style-name="T1"> </text:span><text:span text:style-name="T2">(19/4) </text:span> ⲕⲟⲛ[·] ϯϩⲓⲏ ⲛ ⲃⲱⲕ ⲉϩⲣⲁⲓ̈ ⲉⲧ’ϫⲟⲥⲉ <text:line-break/><text:span text:style-name="T1"> </text:span><text:span text:style-name="T2">(19/5) </text:span> ⲉ ⲧⲉⲗⲓⲟⲥ ⲙⲛ ⲡⲓⲕⲗ̅ⲥ̅ ⲟⲛ ⲙ ⲡⲉⲓ̈ⲣⲏ‐ <text:line-break/><text:span text:style-name="T1"> </text:span><text:span text:style-name="T2">(19/6) </text:span> ⲧⲉ· ⲡⲓⲁⲩⲧⲟⲅⲉⲛⲏⲥ ⲇⲉ ⲛ ⲛⲟⲩⲧⲉ <text:line-break/><text:span text:style-name="T1"> </text:span><text:span text:style-name="T2">(19/7) </text:span> ⲟⲩϣⲟⲣⲡ’ ⲛ ⲁⲣⲭⲱⲛ ⲡⲉ ⲛⲧⲉ ⲛⲉ‐ <text:line-break/><text:span text:style-name="T1"> </text:span><text:span text:style-name="T2">(19/8) </text:span> ⲧⲉ ⲛⲟⲩϥ ⲛⲛ ⲉⲱⲛ ⲙⲛ ⲛⲓⲁⲅⲅⲉⲗⲟⲥ <text:line-break/><text:span text:style-name="T1"> </text:span><text:span text:style-name="T2">(19/9) </text:span> ⲙ ⲡⲣⲏⲧⲉ ⲛ ϩⲉⲛⲙⲉⲣⲟⲥ ⲛⲧⲁϥ· ⲛⲏ ⲅⲁⲣ <text:line-break/><text:span text:style-name="T1"> </text:span><text:span text:style-name="T2">(19/10) </text:span> ⲉⲧⲉ ⲡⲓϥⲧⲟⲟⲩ ϣⲟⲟⲡ’ ⲙⲙⲟϥ ⲕⲁ‐ <text:line-break/><text:span text:style-name="T1"> </text:span><text:span text:style-name="T2">(19/11) </text:span> ⲧⲁ ⲟⲩⲁ ⲥⲉⲛⲧⲉ ⲡⲉⲙⲉϩϯⲟⲩ ⲛⲛ ⲉ‐ <text:line-break/><text:span text:style-name="T1"> </text:span><text:span text:style-name="T2">(19/12) </text:span> ⲱⲛ ⲙⲙⲁ̣ⲩ ϩⲓ ⲟⲩⲥⲟⲡ’· ⲁⲩⲱ ϥϣⲟ‐ <text:line-break/><text:span text:style-name="T1"> </text:span><text:span text:style-name="T2">(19/13) </text:span> ⲟⲡ’ ⲛϭⲓ ⲡⲓⲙⲉϩϯⲟⲩ ϩⲛ ⲟⲩ̣ⲁ· ⲡⲓ‐ <text:line-break/><text:span text:style-name="T1"> </text:span><text:span text:style-name="T2">(19/14) </text:span> ϥⲧⲟⲟⲩ [ⲡⲉ ⲕ]ⲁⲧⲁ ⲙⲉⲣⲟⲥ ⲡⲓⲙⲉϩ‐ <text:line-break/><text:span text:style-name="T1"> </text:span><text:span text:style-name="T2">(19/15) </text:span> ϯⲟⲩ· ⲛ̣.[...] ⲟⲩⲇⲉ ⲥⲉϫⲏⲕ ⲉⲃⲟⲗ <text:line-break/><text:span text:style-name="T1"> </text:span><text:span text:style-name="T2">(19/16) </text:span> ⲕⲁⲧⲁ ⲟⲩⲁ̣ [ⲉⲩ]ⲛⲧⲁⲩ ⲙⲙⲁⲩ ⲛ ⲟⲩ‐ <text:line-break/><text:span text:style-name="T1"> </text:span><text:span text:style-name="T2">(19/17) </text:span> [....] ⲙ [.....]ⲧ̣ⲉ ⲟⲛ ϥϣⲟⲟⲡ’ ⲛ <text:line-break/><text:span text:style-name="T1"> </text:span><text:span text:style-name="T2">(19/18) </text:span> [........ϩⲟ]ⲟⲩⲧ’ ⲛ ⲕⲁⲧⲁ ⲟⲩⲁ <text:line-break/><text:span text:style-name="T1"> </text:span><text:span text:style-name="T2">(19/19) </text:span> [ ]ⲙ ⲅⲁⲣ ⲡⲉ ⲛⲧⲉ <text:line-break/><text:span text:style-name="T1"> </text:span><text:span text:style-name="T2">(19/20) </text:span> [ ] ⲛ ⲛⲟⲩⲧⲉ· ⲡⲓ‐ <text:line-break/><text:span text:style-name="T1"> </text:span><text:span text:style-name="T2">(19/21) </text:span> [ ] ⲇⲉ ⲛⲛ ⲁⲧⲛⲁⲩ <text:line-break/><text:span text:style-name="T1"> </text:span><text:span text:style-name="T2">(19/22) </text:span> [ⲉⲣⲟ%1 ] ⲛ ϩⲟ[ⲟⲩⲧ’] ⲛ ⲛⲟⲩⲥ <text:line-break/><text:span text:style-name="T1"> </text:span><text:span text:style-name="T2">(19/23) </text:span> [ ] ⲛ̣ ⲧⲉ̣[... ⲉ]ⲧ’ϣⲟⲟⲡ <text:line-break/><text:span text:style-name="T1"> </text:span><text:span text:style-name="T2">(19/24) </text:span> [ ].̅.̅[...].ⲛ· ⲟⲩ <text:line-break/><text:soft-page-break/><text:span text:style-name="T1"> </text:span><text:span text:style-name="T2">(19/25) </text:span> [ ]ⲩ <text:line-break/><text:span text:style-name="T1"> </text:span><text:span text:style-name="T2">(19/26) </text:span> [ ]ⲩ <text:line-break/><text:span text:style-name="T1"> </text:span><text:span text:style-name="T2">(19/27) </text:span> [ ]ⲉ <text:line-break/><text:span text:style-name="T1"> </text:span><text:span text:style-name="T2">(19/28) </text:span> [ <text:line-break/><text:span text:style-name="T1"> </text:span><text:span text:style-name="T2">(19/29) </text:span> [ ]ⲉ <text:line-break/><text:span text:style-name="T1"> </text:span><text:span text:style-name="T2">(20/1) </text:span> ⲛ ϩⲉⲛⲙⲉⲣⲟⲥ ⲉⲩⲟⲛϩ ⲁⲩⲱ ⲛ ⲧⲉⲗⲓⲟⲥ <text:line-break/><text:span text:style-name="T1"> </text:span><text:span text:style-name="T2">(20/2) </text:span> ⲡ̣[ⲓⲡ]ⲧⲏⲣ[ϥ] ⲇⲉ ⲁⲩⲱ ⲡⲓⲅⲉⲛ[ⲟ]ⲥ ⲙ ⲡⲁⲛ‐ <text:line-break/><text:span text:style-name="T1"> </text:span><text:span text:style-name="T2">(20/3) </text:span> ⲧ̣ⲉ̣ⲗ̣ⲓⲟⲥ ⲙⲛ ⲡⲏ ⲉⲧ’ϫⲟⲥⲉ̣ ⲉ ⲧⲉⲗⲓⲟⲥ <text:line-break/><text:span text:style-name="T1"> </text:span><text:span text:style-name="T2">(20/4) </text:span> ⲁⲩⲱ ⲙ ⲙⲁⲕⲁⲣⲓⲟⲥ· ⲡⲓⲕ̣ⲁ̣ⲗⲩⲡⲧⲟⲥ <text:line-break/><text:span text:style-name="T1"> </text:span><text:span text:style-name="T2">(20/5) </text:span> ⲇⲉ ⲛ ϫⲡⲟ ⲉⲃⲟⲗ ⲙⲙⲟϥ ⲙⲁⲩⲁⲁϥ· <text:line-break/><text:span text:style-name="T1"> </text:span><text:span text:style-name="T2">(20/6) </text:span> ⲉⲩⲁⲣⲭⲏ ⲡⲉ ⲉϥⲣ ϣⲣⲡ’ ⲛ ϣⲟⲟⲡ’ ⲛⲧⲉ <text:line-break/><text:span text:style-name="T1"> </text:span><text:span text:style-name="T2">(20/7) </text:span> ⲡⲓⲁⲩⲧⲟⲅⲉⲛⲏⲥ ⲉⲩⲛⲟⲩⲧⲉ ⲡⲉ ⲁⲩⲱ <text:line-break/><text:span text:style-name="T1"> </text:span><text:span text:style-name="T2">(20/8) </text:span> ⲛ ϣⲟⲣⲡ’ ⲛ ⲉⲓⲱⲧ’· ⲉⲩⲗⲟⲉⲓϭⲉ ⲡⲉ ⲛ‐ <text:line-break/><text:span text:style-name="T1"> </text:span><text:span text:style-name="T2">(20/9) </text:span> ⲧⲉ ⲡⲓⲡⲣⲱⲧⲟⲫⲁⲛⲏⲥ· ⲉⲩⲉⲓⲱⲧ’ <text:line-break/><text:span text:style-name="T1"> </text:span><text:span text:style-name="T2">(20/10) </text:span> ⲡⲉ ⲛⲧⲉ ⲛⲉⲧⲉ ⲛⲟⲩϥ ⲙ ⲙⲉⲣⲟⲥ· <text:line-break/><text:span text:style-name="T1"> </text:span><text:span text:style-name="T2">(20/11) </text:span> ⲉⲩⲛⲟⲩⲧⲉ ⲛ ⲉⲓⲱⲧ’ ⲡⲉ ⲉⲩⲣ ϣⲣⲡ’ <text:line-break/><text:span text:style-name="T1"> </text:span><text:span text:style-name="T2">(20/12) </text:span> ⲛ ⲉⲓⲙⲉ ⲉⲣⲟϥ· ⲁⲩⲱ ⲛⲉⲩⲉⲓⲙⲉ ⲉⲣⲟϥ <text:line-break/><text:span text:style-name="T1"> </text:span><text:span text:style-name="T2">(20/13) </text:span> ⲁⲛ· ⲟⲩϭⲟⲙ ⲅⲁⲣ ⲉⲃⲟⲗ ⲙⲙⲟϥ ⲡⲉ ⲙⲛ <text:line-break/><text:span text:style-name="T1"> </text:span><text:span text:style-name="T2">(20/14) </text:span> ⲟⲩⲉ̣[ⲓ]ⲱⲧ’ ⲉⲃⲟⲗ ⲙ[ⲙⲟ]ϥ ⲙⲁⲩⲁⲁϥ· <text:line-break/><text:span text:style-name="T1"> </text:span><text:span text:style-name="T2">(20/15) </text:span> ⲉⲧⲃⲉ ⲡⲁⲓ̈ ⲟⲩⲁⲧ’ⲉ̣[ⲓⲱ]ⲧ’̣ ⲡⲉ· ⲡⲓⲁⲧ’̣‐ <text:line-break/><text:span text:style-name="T1"> </text:span><text:span text:style-name="T2">(20/16) </text:span> ⲛⲁⲩ ⲇⲉ ⲉⲣⲟϥ ⲛ̣ [ϣ]ⲙⲧ’ϭⲟⲙ· ϯϣⲟ̣‐ <text:line-break/><text:span text:style-name="T1"> </text:span><text:span text:style-name="T2">(20/17) </text:span> ⲣⲡ’ ⲛ ⲉⲛⲛⲟⲓⲁ ⲛ[ⲧⲉ ⲛⲁⲓ̈] ⲧⲏⲣⲟ[ⲩ] ⲡⲓ[ⲁϩⲟ]‐ <text:line-break/><text:span text:style-name="T1"> </text:span><text:span text:style-name="T2">(20/18) </text:span> ⲣⲁⲧⲟⲛ ⲙ ⲡⲛ̅ⲁ̅· ⲟ̣[....]ⲏ ⲛ̣ [... <text:line-break/><text:span text:style-name="T1"> </text:span><text:span text:style-name="T2">(20/19) </text:span> ⲣⲟⲩ ⲡⲉ· ⲁⲩⲱ [ <text:line-break/><text:span text:style-name="T1"> </text:span><text:span text:style-name="T2">(20/20) </text:span> ⲟⲩⲥⲓⲁ ⲉⲥϩⲁ[ <text:line-break/><text:span text:style-name="T1"> </text:span><text:span text:style-name="T2">(20/21) </text:span> ⲙⲛ ⲟⲩϩⲩⲡⲣ[ⲝⲓⲥ <text:line-break/><text:span text:style-name="T1"> </text:span><text:span text:style-name="T2">(20/22) </text:span> ⲟⲩⲛ ϩⲉⲛϩⲩ[ⲡⲁⲣⲝⲓⲥ <text:line-break/><text:span text:style-name="T1"> </text:span><text:span text:style-name="T2">(20/23) </text:span> ⲟⲩⲱⲛ[ϩ .]ⲧⲗ[ <text:line-break/><text:span text:style-name="T1"> </text:span><text:span text:style-name="T2">(20/24) </text:span> ⲙⲁⲕⲁ̣[ⲣⲓⲟ]ⲥ· ⲁ[ <text:line-break/><text:span text:style-name="T1"> </text:span><text:span text:style-name="T2">(20/25) </text:span> ⲛ ϯⲙⲛ[ⲧ’.]ⲟ[ <text:line-break/><text:span text:style-name="T1"> </text:span><text:span text:style-name="T2">(20/26) </text:span> ⲛⲁⲓ̈ ⲧ[ⲏⲣⲟⲩ <text:line-break/><text:span text:style-name="T1"> </text:span><text:span text:style-name="T2">(20/27) </text:span> ⲡⲓ[ <text:line-break/><text:span text:style-name="T1"> </text:span><text:span text:style-name="T2">(20/28) </text:span> ⲛ [ <text:line-break/><text:span text:style-name="T1"> </text:span><text:span text:style-name="T2">(20/29) </text:span> ⲛ [ <text:line-break/><text:span text:style-name="T1"> </text:span><text:span text:style-name="T2">(20/30) </text:span> ⲧⲉ̣[ <text:line-break/><text:span text:style-name="T1"> </text:span><text:span text:style-name="T2">(21/1) </text:span> ⲟⲡ’ ⲛϩⲣⲁⲓ̈ ⲛϩⲏⲧⲟⲩ· ⲁ[......] <text:line-break/><text:span text:style-name="T1"> </text:span><text:span text:style-name="T2">(21/2) </text:span> ϩⲛ ϩⲉ[ⲛ]ⲕⲟⲟⲩⲉ ⲛⲧⲟⲟⲩ ⲧ[.... <text:line-break/><text:span text:style-name="T1"> </text:span><text:span text:style-name="T2">(21/3) </text:span> ⲉⲃⲟⲗ ϩⲓⲧⲟⲟⲧⲟⲩ ⲧⲏⲣⲟⲩ ⲛ[ϩⲣ]ⲁ̣ⲓ̈ <text:line-break/><text:span text:style-name="T1"> </text:span><text:span text:style-name="T2">(21/4) </text:span> ϩⲛ ⲟⲩⲙⲏⲏϣⲉ ⲙ ⲙⲁ· ⲡⲓⲙⲁ ⲉⲧⲁϥ‐ <text:line-break/><text:span text:style-name="T1"> </text:span><text:span text:style-name="T2">(21/5) </text:span> ⲟⲩⲁϣϥ ⲁⲩⲱ ⲡⲓⲙⲁ ⲉⲧⲉ ϩⲛⲁϥ <text:line-break/><text:span text:style-name="T1"> </text:span><text:span text:style-name="T2">(21/6) </text:span> ⲉⲩⲛϩⲣⲁⲓ̈ ϩⲙ ⲙⲁ ⲛⲓⲙ· ⲁⲩⲱ ⲉⲛ‐ <text:line-break/><text:span text:style-name="T1"> </text:span><text:span text:style-name="T2">(21/7) </text:span> ⲥⲉ ⲛϩⲣⲁⲓ̈ ϩⲛ ⲗⲁⲁⲩ ⲙ ⲙⲁ ⲁⲛ· ⲁⲩⲱ <text:line-break/><text:span text:style-name="T1"> </text:span><text:span text:style-name="T2">(21/8) </text:span> ⲉⲩⲣ ⲭⲱⲣⲓ 〈 〉 ⲛⲉⲩⲡⲛ̅ⲁ̅· ϩⲉⲛⲁⲧⲥⲱ‐ <text:line-break/><text:span text:style-name="T1"> </text:span><text:span text:style-name="T2">(21/9) </text:span> ⲙⲁ ⲅⲁⲣ ⲛⲉ ⲁⲩⲱ ⲥⲉⲥⲟⲧⲡ’ ⲉ ϩⲉⲛ‐ <text:line-break/><text:span text:style-name="T1"> </text:span><text:span text:style-name="T2">(21/10) </text:span> ⲁⲧⲥⲱⲙⲁ· ϩⲉⲛⲁⲧⲡⲱϣⲉ ⲛⲉ ⲙⲛ <text:line-break/><text:span text:style-name="T1"> </text:span><text:span text:style-name="T2">(21/11) </text:span> ϩⲉⲛⲙⲉⲉⲩⲉ ⲉⲩⲟⲛϩ· ⲁⲩⲱ ⲟⲩϭⲟⲙ <text:line-break/><text:span text:style-name="T1"> </text:span><text:span text:style-name="T2">(21/12) </text:span> ⲛⲧⲉ ⲧⲙⲉ ⲙⲛ ⲛⲏ ⲉⲧ’ⲧⲟⲩⲃⲏⲟⲩⲧ’ <text:line-break/><text:soft-page-break/><text:span text:style-name="T1"> </text:span><text:span text:style-name="T2">(21/13) </text:span> ⲛⲧⲉ ⲛⲁⲓ̈ ⲛ[ϩⲟ]ⲩⲟ· ⲉⲩϣⲟⲟⲡ’ ⲡⲣⲟⲥ <text:line-break/><text:span text:style-name="T1"> </text:span><text:span text:style-name="T2">(21/14) </text:span> ⲡⲁⲓ̈ ⲛϩⲟ[ⲩⲟ] ⲉ̣ⲩⲧⲟⲩⲃⲏⲟⲩⲧ’· ⲁⲩⲱ <text:line-break/><text:span text:style-name="T1"> </text:span><text:span text:style-name="T2">(21/15) </text:span> ⲙ ⲡⲣⲏⲧⲉ ⲛ [ⲛⲓⲥ]ⲱⲙⲁ ⲁⲛ ⲉⲧ’ϣⲟ‐ <text:line-break/><text:span text:style-name="T1"> </text:span><text:span text:style-name="T2">(21/16) </text:span> ⲟⲡ’ ϩⲛ ⲟⲩ[ⲧⲟ]ⲡ̣ⲟⲥ ⲛ ⲟⲩⲱⲧ’· <text:line-break/><text:span text:style-name="T1"> </text:span><text:span text:style-name="T2">(21/17) </text:span> ⲡⲁⲛⲧⲱ̣[ⲥ ⲟⲩ]ⲛⲧⲁⲩ ⲙⲙⲁⲩ ⲛ <text:line-break/><text:span text:style-name="T1"> </text:span><text:span text:style-name="T2">(21/18) </text:span> [ⲟ]ⲩⲁⲛⲁ̣ⲅ̣ⲕⲏ ⲏ%0 [ⲕ]ⲁ̣ⲧⲁ ⲡⲧⲏⲣϥ· ⲏ%0 ⲕⲁ‐ <text:line-break/><text:span text:style-name="T1"> </text:span><text:span text:style-name="T2">(21/19) </text:span> [ⲧ]ⲁ̣ ⲟⲩⲙⲉⲣ̣ⲟ̣ⲥ̣[· ϯ]ϩⲓⲏ ⲟⲩⲛ ⲛ ⲃⲱⲕ <text:line-break/><text:span text:style-name="T1"> </text:span><text:span text:style-name="T2">(21/20) </text:span> [ⲉ]ϩ̣ⲣⲁⲓ̈ ⲉ̣.[..]..[..] ⲟⲩⲧⲃⲃⲟ ⲡⲉ <text:line-break/><text:span text:style-name="T1"> </text:span><text:span text:style-name="T2">(21/21) </text:span> [..]ⲧ̣[........] ⲧ̣ⲟⲩⲉⲓ ⲧⲟⲩⲉⲓ <text:line-break/><text:span text:style-name="T1"> </text:span><text:span text:style-name="T2">(21/22) </text:span> [ ]ⲥ ⲕϣ[...] ⲉϩⲣⲁⲓ̈ <text:line-break/><text:span text:style-name="T1"> </text:span><text:span text:style-name="T2">(21/23) </text:span> [ ⲙ]ⲙⲓⲛ̣ [ⲙ]ⲙ̣ⲟⲥ ⲁⲩⲱ <text:line-break/><text:span text:style-name="T1"> </text:span><text:span text:style-name="T2">(21/24) </text:span> [ ]ⲟ̣[....] ⲙ̣ⲙⲟⲟⲩ· <text:line-break/><text:span text:style-name="T1"> </text:span><text:span text:style-name="T2">(21/25) </text:span> [ ]ϣⲟ <text:line-break/><text:span text:style-name="T1"> </text:span><text:span text:style-name="T2">(21/26) </text:span> [ⲟ...]ⲧⲉ <text:line-break/><text:span text:style-name="T1"> </text:span><text:span text:style-name="T2">(21/27) </text:span> [ ]ⲱ <text:line-break/><text:span text:style-name="T1"> </text:span><text:span text:style-name="T2">(21/28) </text:span> [ ⲡⲁⲛ]ⲧ̣ⲱⲥ <text:line-break/><text:span text:style-name="T1"> </text:span><text:span text:style-name="T2">(21/29) </text:span> [ ]ⲟⲩϥ <text:line-break/><text:span text:style-name="T1"> </text:span><text:span text:style-name="T2">(22/1) </text:span> ⲙ ⲙ[ⲉ]ⲣ̣ⲓⲕⲟⲛ ⲛⲛ ⲉⲱⲛ· ⲁⲩⲱ <text:line-break/><text:span text:style-name="T1"> </text:span><text:span text:style-name="T2">(22/2) </text:span> [ⲁϥϣⲁ]ϫ̣ⲉ ϫⲉ ⲡⲱⲥ ⲟⲩⲛ ϣϭⲟⲙ <text:line-break/><text:span text:style-name="T1"> </text:span><text:span text:style-name="T2">(22/3) </text:span> [ⲙ]ⲙ̣ⲟϥ ⲛ ϣⲱⲡ’ ⲉⲣⲟϥ ⲛ ⲟⲩⲧⲩ‐ <text:line-break/><text:span text:style-name="T1"> </text:span><text:span text:style-name="T2">(22/4) </text:span> ⲡ̣ⲟ̣ⲥ ⲛ ϣⲁ ⲉⲛⲉϩ· ⲁⲩⲱ ϣⲁϥⲕⲟⲓ‐ <text:line-break/><text:span text:style-name="T1"> </text:span><text:span text:style-name="T2">(22/5) </text:span> ⲛⲱⲛⲓ ⲛϭⲓ ⲡⲛⲟⲉⲣⲟⲥ ⲛ ⲕⲁⲑⲟⲗⲓ‐ <text:line-break/><text:span text:style-name="T1"> </text:span><text:span text:style-name="T2">(22/6) </text:span> ⲕⲟⲛ· ⲉϣⲁϥϫⲱⲕ ⲉⲃⲟⲗ ⲛϭⲓ ⲡⲓ‐ <text:line-break/><text:span text:style-name="T1"> </text:span><text:span text:style-name="T2">(22/7) </text:span> ⲙⲟⲟⲩ ⲛ ⲁⲩⲧⲟⲅⲉⲛⲏⲥ· ⲉϣⲱ‐ <text:line-break/><text:span text:style-name="T1"> </text:span><text:span text:style-name="T2">(22/8) </text:span> ⲡⲉ ⲇⲉ ⲉϥϣⲁⲛⲉⲓⲙⲉ ⲉⲣⲟϥ ⲙⲛ <text:line-break/><text:span text:style-name="T1"> </text:span><text:span text:style-name="T2">(22/9) </text:span> ⲛⲁⲓ̈ ⲧⲏⲣⲟⲩ· ⲡⲓⲙⲟⲟⲩ ⲙ ⲡⲣⲱ‐ <text:line-break/><text:span text:style-name="T1"> </text:span><text:span text:style-name="T2">(22/10) </text:span> ⲧⲟⲫⲁⲛⲏⲥ ⲡⲉ· ⲉϣⲱⲡⲉ ⲇⲉ <text:line-break/><text:span text:style-name="T1"> </text:span><text:span text:style-name="T2">(22/11) </text:span> ⲉϥϣⲁⲛϩⲱⲧⲡ’ ⲛⲙⲙⲁϥ ⲙⲛ ⲛⲁⲓ̈ <text:line-break/><text:span text:style-name="T1"> </text:span><text:span text:style-name="T2">(22/12) </text:span> ⲧⲏⲣⲟⲩ· ⲡⲁⲡⲓⲕⲁⲗⲩⲡ〈ⲧ〉ⲟⲥ ⲡⲉ· <text:line-break/><text:span text:style-name="T1"> </text:span><text:span text:style-name="T2">(22/13) </text:span> ⲡⲉⲓ̈ⲉⲓⲛⲉ ⲟⲛ ⲉⲧ’ϣⲟⲟⲡ’ ϩⲛ ⲛⲓ‐ <text:line-break/><text:span text:style-name="T1"> </text:span><text:span text:style-name="T2">(22/14) </text:span> ⲉⲱⲛ· ⲉⲉⲓⲙⲉ ⲉ̣ [ⲛⲁ]ⲓ̈ ⲕⲁⲧⲁ ⲟⲩⲁ <text:line-break/><text:span text:style-name="T1"> </text:span><text:span text:style-name="T2">(22/15) </text:span> ⲙⲛ ⲛⲓⲙⲉⲣⲟⲥ̣ ⲛ̣ [....]ⲟⲥ ⲛⲉ· ⲛⲏ <text:line-break/><text:span text:style-name="T1"> </text:span><text:span text:style-name="T2">(22/16) </text:span> ⲛⲧⲉ ⲡⲧⲏⲣϥ [ⲙ ⲡ]ⲙⲁ ⲉⲧⲉ ⲡⲥⲟ‐ <text:line-break/><text:span text:style-name="T1"> </text:span><text:span text:style-name="T2">(22/17) </text:span> ⲟⲩⲛ ⲙⲙⲁⲩ [ⲁⲩⲱ] ⲡ̣ⲏ ⲉⲧⲟⲩⲉⲓ̣‐ <text:line-break/><text:span text:style-name="T1"> </text:span><text:span text:style-name="T2">(22/18) </text:span> ⲙⲉ ⲉⲣⲟϥ ⲁⲩⲡ̣[ⲱ]ⲣϫ̣ [ⲉ]ⲃ̣ⲟⲗ· ⲁ[ⲩⲱ] <text:line-break/><text:span text:style-name="T1"> </text:span><text:span text:style-name="T2">(22/19) </text:span> ⲟⲩⲙⲛⲧ’ϣ[ⲃⲏⲣ] ⲉⲧⲛⲧⲁⲩ [ⲛϩⲣⲁⲓ̈] <text:line-break/><text:span text:style-name="T1"> </text:span><text:span text:style-name="T2">(22/20) </text:span> ϩⲛ ⲛⲉⲩⲉⲣⲏ[ⲩ]· ⲡ[ⲧ]ⲏⲣϥ ⲁⲩ[ⲱ ⲛⲁⲓ̈] <text:line-break/><text:span text:style-name="T1"> </text:span><text:span text:style-name="T2">(22/21) </text:span> ⲧⲏⲣⲟⲩ ⲉⲩ.[.......].[.]ⲟ̣ⲩ[... <text:line-break/><text:span text:style-name="T1"> </text:span><text:span text:style-name="T2">(22/22) </text:span> ϫⲱⲕⲙ̣ ⲉ̣ ⲡⲓ[ⲭⲱⲕⲙ ⲛ ⲁⲩⲧⲟⲅⲉ]‐ <text:line-break/><text:span text:style-name="T1"> </text:span><text:span text:style-name="T2">(22/23) </text:span> ⲛⲏⲥ [..] ϣⲁϥ[ <text:line-break/><text:span text:style-name="T1"> </text:span><text:span text:style-name="T2">(22/24) </text:span> ⲛ ⲧⲉ[..]..[ <text:line-break/><text:span text:style-name="T1"> </text:span><text:span text:style-name="T2">(22/25) </text:span> ⲙ[ <text:line-break/><text:span text:style-name="T1"> </text:span><text:span text:style-name="T2">(22/26) </text:span> ⲙ[ <text:line-break/><text:span text:style-name="T1"> </text:span><text:span text:style-name="T2">(22/27) </text:span> .[ <text:line-break/><text:span text:style-name="T1"> </text:span><text:span text:style-name="T2">(22/28) </text:span> .[ <text:line-break/><text:span text:style-name="T1"> </text:span><text:span text:style-name="T2">(22/29) </text:span> .[ <text:line-break/><text:span text:style-name="T1"> </text:span><text:span text:style-name="T2">(23/1) </text:span> ⲙⲙⲁⲩ ⲉϥⲟⲩⲱⲛϩ ⲙⲙⲟ̣[ϥ ⲉⲃ]ⲟⲗ <text:line-break/><text:soft-page-break/><text:span text:style-name="T1"> </text:span><text:span text:style-name="T2">(23/2) </text:span> ⲉⲧⲉ ⲡⲁⲓ̈ ⲡⲉ ⲉⲧⲁϥⲉⲓⲙⲉ̣ [ϫⲉ ⲡ]ⲱⲥ <text:line-break/><text:span text:style-name="T1"> </text:span><text:span text:style-name="T2">(23/3) </text:span> ϥϣⲟⲟⲡ’ ⲛⲁϥ· ⲁⲩⲱ ⲟⲩⲛ̣[ⲧⲁ]ϥ ⲛ̅‐ <text:line-break/><text:span text:style-name="T1"> </text:span><text:span text:style-name="T2">(23/4) </text:span> ⲛ ⲟⲩⲙⲛⲧ’ϣⲃⲏⲣ ϩⲁ ⲛⲉⲩⲉⲣⲏⲟⲩ <text:line-break/><text:span text:style-name="T1"> </text:span><text:span text:style-name="T2">(23/5) </text:span> ⲁϥϫⲱⲕⲙ ⲉ ⲡⲓϫⲱⲕⲙ ⲙ ⲡⲣⲱⲧⲟ‐ <text:line-break/><text:span text:style-name="T1"> </text:span><text:span text:style-name="T2">(23/6) </text:span> ⲫⲁⲛⲏⲥ· ϯⲁⲣⲭⲏ ⲇⲉ ⲛⲧⲉ ⲛⲁⲓ̈ ⲉ‐ <text:line-break/><text:span text:style-name="T1"> </text:span><text:span text:style-name="T2">(23/7) </text:span> ϣⲱⲡⲉ ⲉϣⲁϥⲉⲓⲙⲉ ⲉⲣⲟⲥ ϫⲉ <text:line-break/><text:span text:style-name="T1"> </text:span><text:span text:style-name="T2">(23/8) </text:span> ⲡⲱⲥ ⲥⲉⲟⲩⲟⲛϩ ⲉⲃⲟⲗ ⲧⲏⲣⲟⲩ ϩⲛ <text:line-break/><text:span text:style-name="T1"> </text:span><text:span text:style-name="T2">(23/9) </text:span> ⲟⲩⲁⲡⲉ ⲛ ⲟⲩⲱⲧ’· ⲁⲩⲱ ⲡⲱⲥ <text:line-break/><text:span text:style-name="T1"> </text:span><text:span text:style-name="T2">(23/10) </text:span> ⲉⲩϩⲟⲧⲡ’ ⲛϭⲓ ⲛⲁⲓ̈ ⲧⲏⲣⲟⲩ ϣⲁⲩ‐ <text:line-break/><text:span text:style-name="T1"> </text:span><text:span text:style-name="T2">(23/11) </text:span> ⲡⲱⲣϫ ⲉⲃⲟⲗ· ⲁⲩⲱ ⲡⲱⲥ ϣⲁⲩ‐ <text:line-break/><text:span text:style-name="T1"> </text:span><text:span text:style-name="T2">(23/12) </text:span> ϩⲱⲧⲡ’ ⲟⲛ ⲛϭⲓ ⲛⲏ ⲉⲧⲁⲩⲡⲱⲣϫ <text:line-break/><text:span text:style-name="T1"> </text:span><text:span text:style-name="T2">(23/13) </text:span> ⲉⲃⲟⲗ· ⲁⲩⲱ̣ ⲡⲱⲥ ϣⲁⲣⲉⲛⲓⲙⲉ‐ <text:line-break/><text:span text:style-name="T1"> </text:span><text:span text:style-name="T2">(23/14) </text:span> ⲣⲟⲥ ϩⲱ[ⲧⲡ’ ⲙ]ⲛ̣ ⲛⲓⲧⲏⲣϥ ⲁⲩⲱ ⲛⲓ‐ <text:line-break/><text:span text:style-name="T1"> </text:span><text:span text:style-name="T2">(23/15) </text:span> ⲉⲓⲇⲟⲥ ⲙⲛ ⲛ̣[ⲓⲅⲉ]ⲛⲟⲥ· ⲉϣⲱⲡⲉ <text:line-break/><text:span text:style-name="T1"> </text:span><text:span text:style-name="T2">(23/16) </text:span> ⲉⲣϣⲁⲟⲩ[ⲁ ⲉⲓ]ⲙ̣ⲉ ⲉ ⲛⲁⲓ̈ ⲁϥϫⲱⲕⲙ <text:line-break/><text:span text:style-name="T1"> </text:span><text:span text:style-name="T2">(23/17) </text:span> ⲉ ⲡⲓϫⲱ[ⲕⲙ ⲛ] ⲕ̅ⲗ̅ⲥ̅· ⲁⲩⲱ ⲕⲁⲧⲁ <text:line-break/><text:span text:style-name="T1"> </text:span><text:span text:style-name="T2">(23/18) </text:span> ⲡⲟⲩⲁ ⲡⲟⲩⲁ [ⲛ ⲛⲓ]ⲧⲟⲡⲟⲥ· ⲟⲩⲛ‐ <text:line-break/><text:span text:style-name="T1"> </text:span><text:span text:style-name="T2">(23/19) </text:span> ⲧⲁϥ ⲙⲙⲁⲩ ⲛ ⲟ[ⲩ]ⲙⲉⲣⲓⲕⲟⲛ ⲛⲧⲉ <text:line-break/><text:span text:style-name="T1"> </text:span><text:span text:style-name="T2">(23/20) </text:span> ⲛⲓϣ̣ⲁ̣ ⲉⲛ̣ⲉ̣[ϩ ⲁⲩ]ⲱ ϣⲁϥⲃⲱⲕ <text:line-break/><text:span text:style-name="T1"> </text:span><text:span text:style-name="T2">(23/21) </text:span> ⲉϩ[ⲣⲁⲓ̈...ⲙ] ⲡⲣⲏ̣[ⲧⲉ] ⲉϣⲁϥ‐ <text:line-break/><text:span text:style-name="T1"> </text:span><text:span text:style-name="T2">(23/22) </text:span> [......ⲧⲟⲩ]ⲃⲏⲟ[ⲩ ⲛ ϩ]ⲁⲡⲗⲟⲩⲛ <text:line-break/><text:span text:style-name="T1"> </text:span><text:span text:style-name="T2">(23/23) </text:span> ⲛ ⲟⲩⲟ̣ⲉⲓϣ ⲛ̣[ⲓⲙ] ⲉϥ[..].ⲩ ⲉϩⲣⲁⲓ̈ <text:line-break/><text:span text:style-name="T1"> </text:span><text:span text:style-name="T2">(23/24) </text:span> ⲉ ⲟⲩⲁ ⲙ̅ ⲡ[ ]ϣ <text:line-break/><text:span text:style-name="T1"> </text:span><text:span text:style-name="T2">(23/25) </text:span> ⲛⲓⲙ ⲉϥⲧⲟⲩⲃ̣[ⲏⲟⲩⲧ’ ⲛ ϩⲁⲡ]ⲗⲟⲩ‐· <text:line-break/><text:span text:style-name="T1"> </text:span><text:span text:style-name="T2">(23/26) </text:span> ϣⲁϥⲙⲟⲩϩ ⲉⲃⲟ[ⲗ.......]ⲙⲉ <text:line-break/><text:span text:style-name="T1"> </text:span><text:span text:style-name="T2">(23/27) </text:span> ϩⲛ ⲟⲩϩⲩⲡⲁⲣⲝⲓⲥ ⲙ [.....]ⲁ̣ <text:line-break/><text:span text:style-name="T1"> </text:span><text:span text:style-name="T2">(23/28) </text:span> ⲁⲩⲱ ⲟⲩⲡ̅ⲛ̅ⲁ̅ ⲉϥⲟⲩ[ⲁⲁⲃ] ⲙ̣ⲛ <text:line-break/><text:span text:style-name="T1"> </text:span><text:span text:style-name="T2">(24/1) </text:span> ⲗⲁⲁⲩ̣ ⲛⲧⲁϥ ⲛⲥⲁⲃⲟⲗ ⲙⲙⲟϥ· ϣⲁϥ‐ <text:line-break/><text:span text:style-name="T1"> </text:span><text:span text:style-name="T2">(24/2) </text:span> ⲛ[ⲁⲩ ⲙ]ⲉⲛ ϩⲛ ⲟⲩⲯⲩⲭⲏ ⲇⲉ ⲛ ⲧⲉⲗⲓ‐ <text:line-break/><text:span text:style-name="T1"> </text:span><text:span text:style-name="T2">(24/3) </text:span> ⲟ̣[ⲥ ⲉ ⲛ]ⲁⲛⲓⲁⲩⲧⲟⲅⲉⲛⲏⲥ· ϩⲛ ⲟⲩⲛⲟⲩⲥ <text:line-break/><text:span text:style-name="T1"> </text:span><text:span text:style-name="T2">(24/4) </text:span> ⲇ[ⲉ ⲉ] ⲛⲁⲡⲓϣⲙⲛⲧ’ϩⲟⲟⲩⲧ’· ϩⲛ ⲟⲩ‐ <text:line-break/><text:span text:style-name="T1"> </text:span><text:span text:style-name="T2">(24/5) </text:span> ⲡ̅ⲛ̅ⲁ̅ ⲇⲉ ⲉϥⲟⲩⲁⲁⲃ ⲛⲁⲛⲓⲡⲣⲱⲧⲟⲫⲁ‐ <text:line-break/><text:span text:style-name="T1"> </text:span><text:span text:style-name="T2">(24/6) </text:span> ⲛⲏⲥ· ϣⲁϥⲥⲱⲧⲙ ⲇⲉ ⲉⲧⲃⲉ ⲡⲓⲕⲗ̅ⲥ̅ <text:line-break/><text:span text:style-name="T1"> </text:span><text:span text:style-name="T2">(24/7) </text:span> ⲉⲃⲟⲗ ϩⲓⲧⲛ ⲛⲓϭⲟⲙ ⲛⲧⲉ ⲡⲓⲡⲛ̅ⲁ̅ ⲉⲧⲁⲩ‐ <text:line-break/><text:span text:style-name="T1"> </text:span><text:span text:style-name="T2">(24/8) </text:span> ⲉⲓ ⲉⲃⲟⲗ ⲙⲙⲟϥ ϩⲛ 〈ⲟⲩ〉ⲟⲩⲱⲛϩ ⲉⲃⲟⲗ ⲉϥ‐ <text:line-break/><text:span text:style-name="T1"> </text:span><text:span text:style-name="T2">(24/9) </text:span> ⲥⲟⲧⲡ’ ⲛϩⲟⲩⲟ ⲛⲧⲉ ⲡⲓⲁϩⲟⲣⲁⲧⲟⲛ ⲙ <text:line-break/><text:span text:style-name="T1"> </text:span><text:span text:style-name="T2">(24/10) </text:span> ⲡⲛ̅ⲁ̅· ϩⲣⲁⲓ̈ ⲇⲉ ϩⲛ ϯⲉⲛⲛⲟⲓⲁ ⲧⲁⲓ̈ ⲉⲧ’‐ <text:line-break/><text:span text:style-name="T1"> </text:span><text:span text:style-name="T2">(24/11) </text:span> ϣⲟⲟⲡ’ ϯⲛⲟⲩ ϩⲛ ⲟⲩⲥⲓⲅⲏ· ⲛϩⲣⲁⲓ̈ ⲇⲉ <text:line-break/><text:span text:style-name="T1"> </text:span><text:span text:style-name="T2">(24/12) </text:span> ϩⲛ ϯϣⲟⲣⲡ’ ⲛ ⲉⲛⲛⲟⲓⲁ· ⲉⲧⲃⲉ ⲡⲓϣⲙⲧ’‐ <text:line-break/><text:span text:style-name="T1"> </text:span><text:span text:style-name="T2">(24/13) </text:span> ϭⲟⲙ ⲛ ⲁϩⲟⲣⲁⲧⲟⲛ ⲙ ⲡⲛ̅ⲁ̅ ⲉⲩⲥⲱⲧⲙ <text:line-break/><text:span text:style-name="T1"> </text:span><text:span text:style-name="T2">(24/14) </text:span> ϭⲉ ⲡⲉ ⲙⲛ ⲟⲩϭⲟⲙ ⲛⲧⲉ ⲟⲩⲥⲓⲅⲏ ⲉⲥ‐ <text:line-break/><text:span text:style-name="T1"> </text:span><text:span text:style-name="T2">(24/15) </text:span> ⲧⲟⲩⲃⲏⲟⲩⲧ’ ϩⲛ ⲟⲩ̣[ⲡ̅]ⲛ̣̅ⲁ̅ ⲉϥⲧⲁⲛϩⲟ <text:line-break/><text:span text:style-name="T1"> </text:span><text:span text:style-name="T2">(24/16) </text:span> ϯⲧⲉⲗⲓⲟⲥ ⲁⲩⲱ ⲛ.[.].[.] ⲛ̅ ⲧⲉⲗⲓⲟⲥ <text:line-break/><text:span text:style-name="T1"> </text:span><text:span text:style-name="T2">(24/17) </text:span> ⲁⲩⲱ ⲙ ⲡⲁⲛⲧⲉ[ⲗⲓⲟ]ⲥ̣· ⲥⲉϣⲟⲟⲡ’ <text:line-break/><text:span text:style-name="T1"> </text:span><text:span text:style-name="T2">(24/18) </text:span> ⲟⲩⲛ ⲛϭⲓ ϩⲉⲛⲉⲟ[ⲟⲩ ⲉ]ⲩⲧⲏϣ ⲉϩⲣⲁⲓ̈ <text:line-break/><text:span text:style-name="T1"> </text:span><text:span text:style-name="T2">(24/19) </text:span> ⲉϫⲛ ⲛⲁⲓ̈ ⲛ ⲣⲉϥⲧ[ⲁⲛϩⲟ] ⲛ̣ⲏ ⲉⲧⲁⲩϫⲓ <text:line-break/><text:span text:style-name="T1"> </text:span><text:span text:style-name="T2">(24/20) </text:span> ⲱⲙⲥ ⲛ ⲧⲁⲡⲙⲉ̣ [ⲙ]ⲛ ⲟⲩⲅⲛⲱⲥⲓⲥ· <text:line-break/><text:soft-page-break/><text:span text:style-name="T1"> </text:span><text:span text:style-name="T2">(24/21) </text:span> ⲁⲩⲱ ⲛⲏ ⲙⲉ[ⲛ ⲉ]ⲧⲙⲡϣⲁ ϣⲁⲩⲁⲣ[ⲉϩ] <text:line-break/><text:span text:style-name="T1"> </text:span><text:span text:style-name="T2">(24/22) </text:span> ⲉⲣⲟⲟⲩ· ⲛⲏ ⲇ[ⲉ] ⲉⲧⲉ ϩⲉⲛⲉⲃⲟⲗ ϩⲙ <text:line-break/><text:span text:style-name="T1"> </text:span><text:span text:style-name="T2">(24/23) </text:span> ⲡⲉⲓ̈ⲅⲉⲛⲟⲥ ⲁⲛ [ⲛⲉ .]..[..]ⲁⲩ[ <text:line-break/><text:span text:style-name="T1"> </text:span><text:span text:style-name="T2">(24/24) </text:span> ⲁⲩⲱ ϣ̣[ⲁ]ⲩⲃⲱ̣[ⲕ.....] .ⲁⲓ̈ ⲉ̣‐ <text:line-break/><text:span text:style-name="T1"> </text:span><text:span text:style-name="T2">(24/25) </text:span> ⲧⲉⲩⲛⲧ[.]ⲛⲉ ⲙ[ <text:line-break/><text:span text:style-name="T1"> </text:span><text:span text:style-name="T2">(24/26) </text:span> ⲉⲃⲟⲗ [.. ϩ]ⲙ ⲡ[ⲓⲙ]ⲉ̣ϩϯⲟⲩ ⲉϣⲁϥ‐ [ <text:line-break/><text:span text:style-name="T1"> </text:span><text:span text:style-name="T2">(24/27) </text:span> ⲱ[ ]ⲁⲛⲧⲓⲧⲩⲡⲟⲥ <text:line-break/><text:span text:style-name="T1"> </text:span><text:span text:style-name="T2">(24/28) </text:span> ⲕ[ ]ⲁ ⲛ̅ⲧⲉ ⲛⲓⲁⲓⲱⲛ <text:line-break/><text:span text:style-name="T1"> </text:span><text:span text:style-name="T2">(24/29) </text:span> ⲟ̣[ ] ⲛϭⲓ ⲟⲩϫⲱⲕⲙ <text:line-break/><text:span text:style-name="T1"> </text:span><text:span text:style-name="T2">(24/30) </text:span> [ ]ⲉ· ⲉϣⲱⲡⲉ ⲇⲉ ⲉⲣ‐ <text:line-break/><text:span text:style-name="T1"> </text:span><text:span text:style-name="T2">(24/31) </text:span> [ϣⲁ ⲟⲩⲁ] ⲕ̣ⲁⲕϥ ⲁϩⲏⲟⲩ ⲙ ⲡⲕⲟⲥ‐ <text:line-break/><text:span text:style-name="T1"> </text:span><text:span text:style-name="T2">(25/1) </text:span> ⲙⲟⲥ ⲁⲩⲱ ⲛϥⲕⲱ ⲉϩⲣⲁ̣ⲓ̣̈ [ⲛ ϯⲅⲛⲱⲥ]ⲓⲥ· <text:line-break/><text:span text:style-name="T1"> </text:span><text:span text:style-name="T2">(25/2) </text:span> ⲁⲩⲱ ⲡⲏ ⲙⲉⲛ ⲉⲧⲉ ⲙⲙⲛ[ⲧⲁϥ ⲛ ⲟ]ⲩ‐ <text:line-break/><text:span text:style-name="T1"> </text:span><text:span text:style-name="T2">(25/3) </text:span> ⲙⲁ ⲛ ϣⲱⲡⲉ ⲙⲛ ⲟⲩϭⲟⲙ· ⲁ[ⲩⲱ] ⲉϥ‐ <text:line-break/><text:span text:style-name="T1"> </text:span><text:span text:style-name="T2">(25/4) </text:span> ⲟⲩⲏϩ ⲛⲥⲁ ϩⲉⲛϩⲏⲃⲩⲉ ⲛⲧⲉ ϩⲉⲛ̣‐ <text:line-break/><text:span text:style-name="T1"> </text:span><text:span text:style-name="T2">(25/5) </text:span> ⲕⲟⲟⲩⲉ ϥϭⲁⲗⲏⲟⲩⲧ’· ⲡⲏ ⲇⲉ ⲉⲧⲉ <text:line-break/><text:span text:style-name="T1"> </text:span><text:span text:style-name="T2">(25/6) </text:span> ⲙⲡϥⲉⲓⲣⲉ ⲛ ⲗⲁⲁⲩ ⲛ ⲛⲟⲃⲉ ⲉⲥⲣⲱ‐ <text:line-break/><text:span text:style-name="T1"> </text:span><text:span text:style-name="T2">(25/7) </text:span> ϣⲉ ⲛⲁⲩ ⲛϭⲓ ⲟⲩⲅⲛⲱⲥⲓⲥ· ⲉϥϥⲓ ⲙ <text:line-break/><text:span text:style-name="T1"> </text:span><text:span text:style-name="T2">(25/8) </text:span> ⲡⲣⲟⲟⲩϣ ⲛ ⲗⲁⲁⲩ ⲁⲛ ⲉϥⲣ ⲙⲉⲧⲁ‐ <text:line-break/><text:span text:style-name="T1"> </text:span><text:span text:style-name="T2">(25/9) </text:span> ⲛⲟⲉⲓ· ⲟⲩⲛ ϩⲉⲛϫⲱⲕⲙ ⲇⲉ ⲧⲏϣ <text:line-break/><text:span text:style-name="T1"> </text:span><text:span text:style-name="T2">(25/10) </text:span> ϩⲛ ⲛⲁⲓ̈ ⲛ ⲧⲟⲩϩⲉ· ϯϩⲓⲏ ⲇⲉ ⲉ‐ <text:line-break/><text:span text:style-name="T1"> </text:span><text:span text:style-name="T2">(25/11) </text:span> ϩⲟⲩⲛ ⲉ ⲛⲓⲁⲩⲧⲟⲅⲉⲛⲏⲥ· ⲡⲏ ϯ‐ <text:line-break/><text:span text:style-name="T1"> </text:span><text:span text:style-name="T2">(25/12) </text:span> ⲛⲟ̣ⲩ̣ ⲉⲧⲁⲕϫⲓ ⲱⲙⲥ ⲛϩⲏⲧϥ ⲛ ⲥⲟⲡ’ <text:line-break/><text:span text:style-name="T1"> </text:span><text:span text:style-name="T2">(25/13) </text:span> ⲛⲓⲙ ⲉⲧⲥⲙ̣[ⲡ]ϣⲁ ⲉ ⲛⲁⲩ ⲉ ⲛⲓⲕⲁⲧⲁ <text:line-break/><text:span text:style-name="T1"> </text:span><text:span text:style-name="T2">(25/14) </text:span> ⲟ̣ⲩⲁ ⲛ [ⲧⲉⲗⲓⲟ]ⲥ̣· ⲉⲩⲅⲛⲱⲥⲓⲥ ⲡⲉ <text:line-break/><text:span text:style-name="T1"> </text:span><text:span text:style-name="T2">(25/15) </text:span> ⲛⲧⲉ ⲡⲧⲏⲣϥ̣ [ⲉⲧ]ⲁⲥϣⲱⲡⲉ ⲉⲃⲟⲗ <text:line-break/><text:span text:style-name="T1"> </text:span><text:span text:style-name="T2">(25/16) </text:span> ϩⲛ ⲛⲓϭ̣ⲟⲙ ⲛ̣[ⲧⲉ] ⲛⲓⲁⲩⲧⲟⲅⲉⲛⲏⲥ <text:line-break/><text:span text:style-name="T1"> </text:span><text:span text:style-name="T2">(25/17) </text:span> ⲡⲏ ⲉⲧⲕⲕ̣ⲁⲁ̣[ϥ·] ⲉⲕϣⲁⲛⲟⲩⲱ‐ <text:line-break/><text:span text:style-name="T1"> </text:span><text:span text:style-name="T2">(25/18) </text:span> ⲧⲃ ⲛ ⲛⲓⲉⲱⲛ ⲙ [ⲡⲁ]ⲛⲧⲉⲗⲓⲟⲥ· ⲡⲓ‐ <text:line-break/><text:span text:style-name="T1"> </text:span><text:span text:style-name="T2">(25/19) </text:span> ⲙⲉϩϣⲟⲙⲧ’ ⲇⲉ [ⲛ] ϫⲱⲕⲙ ⲉⲕϣⲁⲛ‐ <text:line-break/><text:span text:style-name="T1"> </text:span><text:span text:style-name="T2">(25/20) </text:span> ϫⲱⲕ̣ⲙ̣ ⲉ̣ ..[....]ⲧⲉ ⲉⲕⲉⲥⲱⲧⲙ <text:line-break/><text:span text:style-name="T1"> </text:span><text:span text:style-name="T2">(25/21) </text:span> ⲉ ⲛⲓ̣[.........] ⲟⲛ̣[ⲧ]ⲱⲥ ⲙ ⲡⲓⲙⲁ <text:line-break/><text:span text:style-name="T1"> </text:span><text:span text:style-name="T2">(25/22) </text:span> ⲉ[........ ⲉ]ⲧⲃⲉ [ⲛⲉ]ⲓ̣̈ⲣ̣ⲁⲛ ⲇⲉ <text:line-break/><text:span text:style-name="T1"> </text:span><text:span text:style-name="T2">(25/23) </text:span> ⲉⲩϣⲟⲟⲡ’̣ ⲙ̣ [ⲡ]ⲉⲓ̈ⲣ[ⲏⲧ]ⲉ ⲉⲟⲩⲁ <text:line-break/><text:span text:style-name="T1"> </text:span><text:span text:style-name="T2">(25/24) </text:span> ⲇⲉ ⲡⲉ ⲁⲩ[ ]ⲧ’ <text:line-break/><text:span text:style-name="T1"> </text:span><text:span text:style-name="T2">(25/25) </text:span> ⲡⲉ ⲙ̅ ⲡⲣⲏⲧ̣[ ]ⲕ <text:line-break/><text:span text:style-name="T1"> </text:span><text:span text:style-name="T2">(25/26) </text:span> ϩⲙ ⲡⲧⲣⲉⲩϣⲱ̣[.........] <text:line-break/><text:span text:style-name="T1"> </text:span><text:span text:style-name="T2">(25/27) </text:span> ϣⲟⲟⲡ’ ⲁⲩⲱ ⲉⲁ[........] <text:line-break/><text:span text:style-name="T1"> </text:span><text:span text:style-name="T2">(25/28) </text:span> ⲟⲩϣⲁϫⲉ ⲛⲧⲁⲩⲡⲟ̣[.....] <text:line-break/><text:span text:style-name="T1"> </text:span><text:span text:style-name="T2">(26/1) </text:span> ⲡⲁⲓ̈ ⲡⲉ̣ ⲟ̣ⲩⲣⲁⲛ ⲉϥϣⲟⲟⲡ’ ⲟⲛⲧⲱⲥ <text:line-break/><text:span text:style-name="T1"> </text:span><text:span text:style-name="T2">(26/2) </text:span> ⲙ[ⲛ ...] ⲉⲧⲉⲩⲉ ⲙⲙⲟⲥ· ⲁⲩⲱ <text:line-break/><text:span text:style-name="T1"> </text:span><text:span text:style-name="T2">(26/3) </text:span> ⲥ[ⲉϣⲟ]ⲟⲡ’ ⲛϭⲓ ⲛⲉⲧ’ϣⲟⲟⲡ’ ϩⲛ ⲟⲩ‐ <text:line-break/><text:span text:style-name="T1"> </text:span><text:span text:style-name="T2">(26/4) </text:span> ⲛⲟ̣[ⲩϩ]ⲙ ⲉⲛⲉⲧⲉ ⲉϥⲉⲓⲛⲉ· ⲁⲩⲱ ⲡⲉϥ‐ <text:line-break/><text:span text:style-name="T1"> </text:span><text:span text:style-name="T2">(26/5) </text:span> ⲉⲓ̣ⲛ̣ⲉ ϩⲙ ⲡⲅⲉⲛⲟⲥ ⲛϩⲣⲁⲓ̈ ϩⲙ ⲡⲉⲧⲉ <text:line-break/><text:span text:style-name="T1"> </text:span><text:span text:style-name="T2">(26/6) </text:span> ⲡⲱϥ· ϣⲁϥⲛⲁⲩ ⲇⲉ ⲁⲩⲱ ϣⲁϥⲙⲙⲉ <text:line-break/><text:span text:style-name="T1"> </text:span><text:span text:style-name="T2">(26/7) </text:span> ⲁⲩⲱ ϣⲁϥⲃⲱⲕ ⲉϩⲟⲩⲛ ⲉⲣⲟϥ ⲁⲩⲱ <text:line-break/><text:span text:style-name="T1"> </text:span><text:span text:style-name="T2">(26/8) </text:span> ϣⲁϥϫⲓ ⲉⲓⲛⲉ̣ ⲙⲙⲟϥ· ϩⲛ ⲟⲩⲥⲙⲏ ⲇⲉ <text:line-break/><text:soft-page-break/><text:span text:style-name="T1"> </text:span><text:span text:style-name="T2">(26/9) </text:span> ⲉ ϫⲟⲟϥ ⲁⲩⲱ ⲉ ⲥⲱⲧⲙ· ϩⲛ ⲟⲩⲥⲱⲧⲙ <text:line-break/><text:span text:style-name="T1"> </text:span><text:span text:style-name="T2">(26/10) </text:span> ⲇⲉ ⲥⲉⲉ ⲛ ⲁⲧ’ϭⲟⲙ ⲉϩⲉⲛⲉⲥⲑⲏⲧⲟⲛ <text:line-break/><text:span text:style-name="T1"> </text:span><text:span text:style-name="T2">(26/11) </text:span> ⲛⲉ ⲁⲩⲱ ⲛ ⲥⲱⲙⲁⲧⲓⲕⲟⲛ· ⲙ ⲡⲣⲏⲧⲉ <text:line-break/><text:span text:style-name="T1"> </text:span><text:span text:style-name="T2">(26/12) </text:span> ⲟⲩⲛ ⲉϣⲁⲩϭⲙϭⲟⲙ ⲉ ϣⲱ̣ⲡ’ ⲉⲣⲟ‐ <text:line-break/><text:span text:style-name="T1"> </text:span><text:span text:style-name="T2">(26/13) </text:span> ⲟⲩ· ⲉϣⲁⲩϣⲱⲡ’ ⲉⲣⲟⲟⲩ ⲙ ⲡⲉⲓ̈ⲣⲏ̣‐ <text:line-break/><text:span text:style-name="T1"> </text:span><text:span text:style-name="T2">(26/14) </text:span> ⲧⲉ ⲁⲩⲱ ⲟⲩⲉⲓⲇⲱ[ⲗⲟ]ⲛ̣ ⲡⲉ ⲉϥⲗ̣ⲟϫ̣[ϩ] <text:line-break/><text:span text:style-name="T1"> </text:span><text:span text:style-name="T2">(26/15) </text:span> ⲙ ⲡⲉⲓ̈ⲣⲏⲧⲉ ⲉϣ̣[ⲁϥ]ϣⲱ̣ⲡⲉ ⲉⲃⲟⲗ <text:line-break/><text:span text:style-name="T1"> </text:span><text:span text:style-name="T2">(26/16) </text:span> ϩⲛ ⲟⲩⲁⲓⲥⲑⲏⲥ[ⲓⲥ ϩ]ⲛ ⲟⲩϣⲁϫⲉ <text:line-break/><text:span text:style-name="T1"> </text:span><text:span text:style-name="T2">(26/17) </text:span> ⲉϥⲥⲟⲧⲡ’ ⲙⲉⲛ ⲉ [ϯⲫ]ⲩⲥⲓⲥ ⲛ ϩⲩⲗⲓ‐ <text:line-break/><text:span text:style-name="T1"> </text:span><text:span text:style-name="T2">(26/18) </text:span> ⲕⲟⲛ· ⲉϥⲑⲉⲃⲓⲏ[ⲩ] ⲇ̣ⲉ̣ [ʹ264] ⲉ ϯⲟⲩⲥⲓⲁ <text:line-break/><text:span text:style-name="T1"> </text:span><text:span text:style-name="T2">(26/19) </text:span> §ⲛ ⲛⲟⲉⲣⲟⲛ· [ʹ264 ⲉ]ⲧⲃⲉ ⲧⲇⲓⲁⲫⲟⲣⲁ ⲇⲉ <text:line-break/><text:span text:style-name="T1"> </text:span><text:span text:style-name="T2">(26/20) </text:span> ⲛⲧⲉ ⲛⲓⲯⲩⲭⲏ [ⲙ]ⲡⲣⲣ ϣⲡⲏⲣⲉ· ϩⲙ <text:line-break/><text:span text:style-name="T1"> </text:span><text:span text:style-name="T2">(26/21) </text:span> ⲡⲧⲣⲉⲩⲙⲉⲉⲩ̣ⲉ ⲇⲉ ϫⲉ ⲥⲉϣⲉⲃ̣ⲓⲏ̣‐ <text:line-break/><text:span text:style-name="T1"> </text:span><text:span text:style-name="T2">(26/22) </text:span> ⲟⲩⲧ’ ⲛⲥⲉⲉⲓⲛ̣[ⲉ ⲁⲛ...ϣ]ⲁ̣ⲣⲟ̣ⲛ <text:line-break/><text:span text:style-name="T1"> </text:span><text:span text:style-name="T2">(26/23) </text:span> ⲛⲉ ⲛⲧⲉ ⲛ̣[ⲏ] ⲉⲧ’ⲙ[........] ⲙⲛ <text:line-break/><text:span text:style-name="T1"> </text:span><text:span text:style-name="T2">(26/24) </text:span> ⲡⲏ ⲙⲟ̣.[.] ϣⲁϥ̣[...]ⲱ̣[..] ⲉⲃⲟⲗ <text:line-break/><text:span text:style-name="T1"> </text:span><text:span text:style-name="T2">(26/25) </text:span> ϩⲛ ⲟⲩ[ⲥⲙ]ⲏ .[...] ⲉϥⲧⲁⲕⲏⲟⲩⲧ’ <text:line-break/><text:span text:style-name="T1"> </text:span><text:span text:style-name="T2">(26/26) </text:span> ⲉⲡ̣[ ]ⲭⲏ ⲛⲧⲁⲩⲛ <text:line-break/><text:span text:style-name="T1"> </text:span><text:span text:style-name="T2">(26/27) </text:span> ⲥ[ ]ⲩⲥⲱⲙⲁ· ⲡⲏ ⲇⲉ <text:line-break/><text:span text:style-name="T1"> </text:span><text:span text:style-name="T2">(26/28) </text:span> ⲉ[........]ⲉϥⲭⲣⲟⲛⲟⲥ ⲉϣⲁϥ‐ <text:line-break/><text:span text:style-name="T1"> </text:span><text:span text:style-name="T2">(26/29) </text:span> ⲥ̣[.......]ⲗ ⲛ ⲟⲩⲟⲉⲓϣ ⲉⲣⲉ‐ <text:line-break/><text:span text:style-name="T1"> </text:span><text:span text:style-name="T2">(27/1) </text:span> ⲧⲉⲩⲯⲭⲏ ϣⲟⲟ̣ⲡ’ ⲛ [....... <text:line-break/><text:span text:style-name="T1"> </text:span><text:span text:style-name="T2">(27/2) </text:span> ⲡⲟⲩⲥⲱⲙⲁ· ⲛⲏ ⲙⲉⲛ ⲉⲧ̣[ⲧⲟⲩⲃⲏ]‐ <text:line-break/><text:span text:style-name="T1"> </text:span><text:span text:style-name="T2">(27/3) </text:span> ⲟⲩⲧ’ ⲉ ⲡⲧⲏⲣϥ ϥⲧⲟⲟⲩ ⲛ̣[....]ⲥ <text:line-break/><text:span text:style-name="T1"> </text:span><text:span text:style-name="T2">(27/4) </text:span> ⲉⲧⲛⲧⲁⲩ· ⲛⲏ ⲇⲉ ⲉⲧⲉ ⲛ̣[ϩⲣⲁⲓ̈ ϩⲛ ⲟ]ⲩ‐ <text:line-break/><text:span text:style-name="T1"> </text:span><text:span text:style-name="T2">(27/5) </text:span> ⲭⲣⲟⲛⲟⲥ ⲡⲥⲉⲓⲧ’ ⲛⲉ· ⲧⲟⲩⲉⲓ ⲧⲟ̣ⲩⲉⲓ <text:line-break/><text:span text:style-name="T1"> </text:span><text:span text:style-name="T2">(27/6) </text:span> ⲙⲙⲟⲟⲩ· ⲟⲩⲛⲧⲁϥ ⲙ ⲡⲉⲥⲉⲓⲇⲟⲥ <text:line-break/><text:span text:style-name="T1"> </text:span><text:span text:style-name="T2">(27/7) </text:span> ⲙⲛ ⲡⲉⲥⲧⲱⲡ’ ⲁⲩⲱ ⲉⲩⲉⲓⲛⲉ ⲥⲉ‐ <text:line-break/><text:span text:style-name="T1"> </text:span><text:span text:style-name="T2">(27/8) </text:span> ϣⲉⲃⲓⲏⲟⲩⲧ’ ⲉⲩⲡⲱⲣϫ ⲉⲃⲟⲗ· ⲁⲩⲱ <text:line-break/><text:span text:style-name="T1"> </text:span><text:span text:style-name="T2">(27/9) </text:span> ⲥⲉⲁϩⲉⲣⲁⲧⲟ· ⲁⲩⲱ ⲉⲩⲣ ϣⲃⲏⲣ <text:line-break/><text:span text:style-name="T1"> </text:span><text:span text:style-name="T2">(27/10) </text:span> ⲛ ϣⲱⲡⲉ ⲙⲛ ⲛⲁⲓ̈ⲯⲩⲭⲏ ⲧⲏⲣⲟⲩ <text:line-break/><text:span text:style-name="T1"> </text:span><text:span text:style-name="T2">(27/11) </text:span> ⲛϭⲓ ϩⲉⲛⲕⲉⲁⲧⲙⲟⲩ ⲙ ⲯⲩⲭⲏ ⲉⲧⲃⲉ <text:line-break/><text:span text:style-name="T1"> </text:span><text:span text:style-name="T2">(27/12) </text:span> ϯ[ⲥⲟ]ⲫⲓⲁ ⲉⲧⲁⲥϭⲱϣⲧ’ ⲉ ⲡⲉⲥⲏⲧ’ <text:line-break/><text:span text:style-name="T1"> </text:span><text:span text:style-name="T2">(27/13) </text:span> ϣ̣ⲟ̣ⲙⲧ’ ⲅⲁⲣ ⲛ ⲉⲓⲇⲟⲥ ⲛⲉ ⲛⲧ[ⲉ] ⲛⲓⲯⲩ‐ <text:line-break/><text:span text:style-name="T1"> </text:span><text:span text:style-name="T2">(27/14) </text:span> ⲭ̣[ⲏ] ⲛ̣ⲛ ⲁⲧ̣[ⲙⲟ]ⲩ· ⲙⲛ ⲛⲏ ⲙⲉⲛ ⲉⲧⲁⲩ‐ <text:line-break/><text:span text:style-name="T1"> </text:span><text:span text:style-name="T2">(27/15) </text:span> ϫⲓ̣ ⲛⲟⲩ̣ⲛⲉ [ⲉⲃ]ⲟⲗ ϩⲓϫⲛ ϯⲡⲁⲣⲟⲓⲕⲏ‐ <text:line-break/><text:span text:style-name="T1"> </text:span><text:span text:style-name="T2">(27/16) </text:span> ⲥⲓⲥ̣ ⲉⲙⲛ[ⲧⲁⲩ] ⲙⲙⲁⲩ ⲛ ⲟⲩϭⲟⲙ <text:line-break/><text:span text:style-name="T1"> </text:span><text:span text:style-name="T2">(27/17) </text:span> ⲛ ϫⲡⲟ ⲉ[ⲥⲛⲙ]ⲙⲁⲩ ⲙⲁⲩⲁ[ⲁ]ⲩ <text:line-break/><text:span text:style-name="T1"> </text:span><text:span text:style-name="T2">(27/18) </text:span> ⲉⲩⲟⲩⲏϩ ⲛ[ⲥⲁ ϩ]ⲉⲛϩⲃⲏⲩⲉ ⲛⲧⲉ <text:line-break/><text:span text:style-name="T1"> </text:span><text:span text:style-name="T2">(27/19) </text:span> ϩⲉⲛⲕⲟⲟⲩⲉ· ⲡ[ⲏ] ⲇⲉ ⲉⲩⲉⲓⲇⲟⲥ ⲛ <text:line-break/><text:span text:style-name="T1"> </text:span><text:span text:style-name="T2">(27/20) </text:span> ⲟⲩⲱⲧ’ ⲡⲉ̣ ⲉⲛ̣ⲧ̣ⲟϥ ⲡⲉⲧⲟⲩⲣ <text:line-break/><text:span text:style-name="T1"> </text:span><text:span text:style-name="T2">(27/21) </text:span> .ⲁ[........]ϥ· ⲛⲏ ⲇⲉ ⲉⲧⲁϩⲉ‐ <text:line-break/><text:span text:style-name="T1"> </text:span><text:span text:style-name="T2">(27/22) </text:span> ⲣⲁ[ⲧⲟⲩ ϩⲓϫⲛ ⲧ]ⲙⲉ[ⲧ]ⲁ̣ⲛⲟⲓⲁ ⲉⲧⲉ <text:line-break/><text:span text:style-name="T1"> </text:span><text:span text:style-name="T2">(27/23) </text:span> ⲙ[..]ϥⲣ[..]..ⲁ.[..]ⲛⲟⲃⲉ· <text:line-break/><text:span text:style-name="T1"> </text:span><text:span text:style-name="T2">(27/24) </text:span> ⲉⲥⲣⲱϣ̣ⲉ̣ [..] ϩ̣ⲉ̣[...]ⲅ̣ⲛⲱⲥⲓⲥ <text:line-break/><text:span text:style-name="T1"> </text:span><text:span text:style-name="T2">(27/25) </text:span> ⲉⲩⲃⲣⲣⲉ ⲡ̣[..........] ⲟⲩⲛ‐ <text:line-break/><text:span text:style-name="T1"> </text:span><text:span text:style-name="T2">(27/26) </text:span> ⲧⲁϥ ⲇⲉ ⲙⲙ[ⲁⲩ..... ⲇⲓ]ⲁ‐ <text:line-break/><text:soft-page-break/><text:span text:style-name="T1"> </text:span><text:span text:style-name="T2">(27/27) </text:span> ⲫⲟⲣⲁ· ⲟⲩⲁⲛⲛⲛ[.......]ⲁ̣ⲩⲣ <text:line-break/><text:span text:style-name="T1"> </text:span><text:span text:style-name="T2">(27/28) </text:span> ⲛⲟⲃⲉ ⲙⲛ ϩⲉⲛⲕⲟⲟ[ⲩⲉ...] <text:line-break/><text:span text:style-name="T1"> </text:span><text:span text:style-name="T2">(28/1) </text:span> ⲁⲩ[ⲣ ⲙⲉ]ⲧⲁⲛⲟ̣ⲉⲓ ⲙⲛ ϩⲉⲛⲕⲟⲟⲩⲉ <text:line-break/><text:span text:style-name="T1"> </text:span><text:span text:style-name="T2">(28/2) </text:span> [.....]ⲥ̣ ⲉⲃⲟⲗ ⲙⲙⲟⲟⲩ ⲙⲁⲩⲁⲁⲩ <text:line-break/><text:span text:style-name="T1"> </text:span><text:span text:style-name="T2">(28/3) </text:span> .[....] ⲅⲁⲣ ⲛ ⲉⲓⲇⲟⲥ ⲉⲧ’ϣⲟⲟⲡ’ ⲛ‐ <text:line-break/><text:span text:style-name="T1"> </text:span><text:span text:style-name="T2">(28/4) </text:span> ⲧⲟ̣[...] ⲙⲛ ⲛⲏ ⲙⲉⲛ ⲉⲧⲁⲩⲉⲓⲣⲉ ⲛ̣ <text:line-break/><text:span text:style-name="T1"> </text:span><text:span text:style-name="T2">(28/5) </text:span> ⲛ[ⲓ]ⲛ̣ⲟ̣ⲃⲉ̣ ⲧⲏⲣⲟⲩ ⲁⲩⲱ ⲁⲩⲣ ⲙⲉⲧⲁ‐ <text:line-break/><text:span text:style-name="T1"> </text:span><text:span text:style-name="T2">(28/6) </text:span> ⲛⲟⲉⲓ· ⲏ%0 ϩⲉⲛⲙⲉⲣⲟⲥ ⲛⲉ ⲏ%0 ⲛⲧⲟⲟⲩ <text:line-break/><text:span text:style-name="T1"> </text:span><text:span text:style-name="T2">(28/7) </text:span> ʹ30ⲉⲁⲩⲱϣ ⲉⲃⲟⲗ ʹ30 ⲙⲙⲟⲟⲩ ⲙⲁⲩⲁⲁⲩ <text:line-break/><text:span text:style-name="T1"> </text:span><text:span text:style-name="T2">(28/8) </text:span> ⲉⲧⲃⲉ ⲡⲁⲓ̈ ⲛⲉⲩⲕⲉⲉⲱⲛ ⲥⲟⲟ̣ⲩ ⲛⲉ <text:line-break/><text:span text:style-name="T1"> </text:span><text:span text:style-name="T2">(28/9) </text:span> ⲕⲁⲧⲁ ⲡⲓⲧⲟⲡⲟⲥ ⲉⲧ’ⲡⲏϩ ⲉⲣⲟⲟⲩ <text:line-break/><text:span text:style-name="T1"> </text:span><text:span text:style-name="T2">(28/10) </text:span> ϩⲛ ϯⲟⲩⲉⲓ ⲧⲟⲩⲉⲓ ⲙⲙⲟⲟⲩ· ⲡⲓⲙⲉϩ‐ <text:line-break/><text:span text:style-name="T1"> </text:span><text:span text:style-name="T2">(28/11) </text:span> ϣⲟⲙⲧ’ ⲇⲉ ⲡⲉ ⲡⲁⲛⲓⲯⲩⲭⲏ ⲛⲧⲉ <text:line-break/><text:span text:style-name="T1"> </text:span><text:span text:style-name="T2">(28/12) </text:span> ⲛⲓⲁⲩⲧⲟⲅⲉⲛⲓⲟⲛ ⲉⲩⲛⲧⲁⲩ ⲙⲙⲁⲩ <text:line-break/><text:span text:style-name="T1"> </text:span><text:span text:style-name="T2">(28/13) </text:span> ⲛ ⲟⲩϣⲁϫⲉ ⲛⲧⲉ ϯⲙⲛⲧⲙⲉ ⲛ̣ ⲁ̣ⲧ’‐ <text:line-break/><text:span text:style-name="T1"> </text:span><text:span text:style-name="T2">(28/14) </text:span> ϣⲁϫⲉ ⲙⲙⲟϥ ⲉϥϣⲟ[ⲟ]ⲡ’ ϩⲛ̣ ⲟ̣ⲩ‐ <text:line-break/><text:span text:style-name="T1"> </text:span><text:span text:style-name="T2">(28/15) </text:span> ⲅⲛⲱⲥⲓⲥ ⲙⲛ ⲟⲩϭⲟ̣[ⲙ ⲉⲃ]ⲟⲗ ⲙⲙ̣[ⲟ]‐ <text:line-break/><text:span text:style-name="T1"> </text:span><text:span text:style-name="T2">(28/16) </text:span> ⲟⲩ ⲙⲁⲩⲁⲁⲩ ⲙⲛ̣ [....]ϩ ⲛ ϣ̣[ⲁ] ⲉ‐ <text:line-break/><text:span text:style-name="T1"> </text:span><text:span text:style-name="T2">(28/17) </text:span> ⲛⲉϩ· ⲉⲩⲛⲧⲁⲩ [ⲇⲉ] ⲙⲙⲁⲩ ⲛ̣ ϥ̣ⲧⲟⲟⲩ <text:line-break/><text:span text:style-name="T1"> </text:span><text:span text:style-name="T2">(28/18) </text:span> ⲛ ⲇⲓⲁⲫⲟⲣⲁ ⲙ ⲡⲣ[ⲏⲧⲉ] ⲟⲛ ⲉ[ⲧⲟ]ⲩϣⲟ‐ <text:line-break/><text:span text:style-name="T1"> </text:span><text:span text:style-name="T2">(28/19) </text:span> ⲟⲡ’̣ ⲛϭⲓ ⲛⲓⲉⲓⲇⲟ̣[ⲥ] ⲛⲧ̣[ⲉ] ⲛⲓⲁⲅⲅⲉⲗⲟⲥ <text:line-break/><text:span text:style-name="T1"> </text:span><text:span text:style-name="T2">(28/20) </text:span> ⲁⲩⲱ ⲙⲛ ⲛⲏ [ⲉⲧ]ⲣ̣ ⲁⲅⲁⲡⲁ ⲛ ϯⲙⲛⲧⲙⲉ̣ <text:line-break/><text:span text:style-name="T1"> </text:span><text:span text:style-name="T2">(28/21) </text:span> ⲙⲛ ⲛⲏ ⲉⲧⲣ ϩⲉ̣[ⲗ]ⲡⲓⲥ ⲙⲛ ⲛⲏ ⲉⲧⲛⲁϩ‐ <text:line-break/><text:span text:style-name="T1"> </text:span><text:span text:style-name="T2">(28/22) </text:span> ⲧⲉ ⲉⲩⲛⲧⲁⲩ [...]ⲛ ⲛ̣ⲏ [ⲉ]ⲧ’ϩⲟ[.]ⲧ’ <text:line-break/><text:span text:style-name="T1"> </text:span><text:span text:style-name="T2">(28/23) </text:span> ⲁⲩⲱ ⲥⲉϣ̣ⲟⲟ̣[ⲡ’......]ⲏⲓ̅[. <text:line-break/><text:span text:style-name="T1"> </text:span><text:span text:style-name="T2">(28/24) </text:span> ⲥⲉϣⲟⲟ[ⲡ’] ⲉϥⲧ[.........]..[ <text:line-break/><text:span text:style-name="T1"> </text:span><text:span text:style-name="T2">(28/25) </text:span> ⲛⲓⲁⲩⲧ[ⲟⲅⲉ]ⲛⲏⲥ̣ [...]ϣ[..].ⲙⲉ <text:line-break/><text:span text:style-name="T1"> </text:span><text:span text:style-name="T2">(28/26) </text:span> ⲡⲁⲟⲩ[ⲱⲛ]ϩ ⲛ [ⲧⲉⲗ]ⲓ̣ⲟⲥ ⲡⲉ· ⲡⲓⲙ[ⲉϩ]‐ <text:line-break/><text:span text:style-name="T1"> </text:span><text:span text:style-name="T2">(28/27) </text:span> ⲥⲛ[ⲁⲩ..........]ⲙⲉ ⲡⲉ· ⲡⲓ̣‐ <text:line-break/><text:span text:style-name="T1"> </text:span><text:span text:style-name="T2">(28/28) </text:span> ⲙ[..........]ⲁⲟⲩⲅⲛⲱⲥⲓ[ⲥ] .[ <text:line-break/><text:span text:style-name="T1"> </text:span><text:span text:style-name="T2">(28/29) </text:span> ϣ̣[........] ⲡⲓⲙⲉϩϥⲧⲟⲟⲩ̣ <text:line-break/><text:span text:style-name="T1"> </text:span><text:span text:style-name="T2">(28/30) </text:span> ⲡ[ⲁⲛⲓⲯⲩ]ⲭⲏ ⲛⲛ ⲁⲧⲙⲟⲩ ⲡⲉ <text:line-break/><text:span text:style-name="T1"> </text:span><text:span text:style-name="T2">(29/1) </text:span> ⲙ ⲡⲉⲓ̈ⲣⲏⲧⲉ ⲟⲛ ⲥⲉ̣ϣⲟⲟ̣[ⲡ’ ⲙⲙⲁ]ⲩ <text:line-break/><text:span text:style-name="T1"> </text:span><text:span text:style-name="T2">(29/2) </text:span> ⲛϭⲓ [ϥ]ⲧⲟⲟⲩ ⲙ ⲫⲱⲥⲧⲏⲣ [ϥⲕⲏ ⲙ]ⲉⲛ <text:line-break/><text:span text:style-name="T1"> </text:span><text:span text:style-name="T2">(29/3) </text:span> ϩ̣ⲓϫⲛ̣ ⲡⲓϣⲟⲣⲡ’ ⲛⲛ ⲉⲱⲛ ⲛ[ϭⲓ ⲁ̅ⲣ̅ⲙ̅]̅ⲟ̅ⲍ̅ⲏ̅ⲗ̅ <text:line-break/><text:span text:style-name="T1"> </text:span><text:span text:style-name="T2">(29/4) </text:span> [ⲟ]ⲩⲱϣ ⲛⲧⲉ ⲡⲛⲟⲩⲧ̣[ⲉ ..].[..] ⲛ <text:line-break/><text:span text:style-name="T1"> </text:span><text:span text:style-name="T2">(29/5) </text:span> ⲧⲙⲉ ⲙⲛ̣ ⲟⲩϩⲱⲧⲡ’ ⲛ̣ⲧ̣ⲉ ⲟⲩⲯⲩⲭⲏ· <text:line-break/><text:span text:style-name="T1"> </text:span><text:span text:style-name="T2">(29/6) </text:span> ϥⲕⲏ ⲇⲉ ϩⲓ[ϫ]ⲛ ⲡⲓⲙⲉϩⲥⲛⲁⲩ ⲛϭⲓ ⲱ̅ⲣ̅ⲟ̅‐ <text:line-break/><text:span text:style-name="T1"> </text:span><text:span text:style-name="T2">(29/7) </text:span> ⲓ̅̈̅ⲁ̅ⲏ̣̅̅ⲗ̅ ⲟⲩϭⲟ̣ⲙ ⲛ ⲣ̣ⲉϥⲉ̣[ⲓⲱ]ⲣϩ ⲛⲧⲉ <text:line-break/><text:span text:style-name="T1"> </text:span><text:span text:style-name="T2">(29/8) </text:span> ϯⲙⲛⲧⲙⲉ[·] ϥⲕⲏ ⲇⲉ ϩⲓϫⲛ ⲡⲓⲙⲉϩ‐ <text:line-break/><text:span text:style-name="T1"> </text:span><text:span text:style-name="T2">(29/9) </text:span> ϣⲟⲙⲧ’ ⲛϭⲓ ⲇⲁⲩ̣ⲉⲓⲑⲉ ⲟⲩⲉⲓⲱⲣϩ ⲛ‐ <text:line-break/><text:span text:style-name="T1"> </text:span><text:span text:style-name="T2">(29/10) </text:span> ⲧⲉ ⲟⲩⲅⲛⲱⲥ̣[ⲓ]ⲥ̣· ϥⲕⲏ ⲇⲉ ϩⲓϫⲛ ⲡⲓ‐ <text:line-break/><text:span text:style-name="T1"> </text:span><text:span text:style-name="T2">(29/11) </text:span> ⲙⲉ̣[ϩ]ϥⲧⲟⲟⲩ ⲛϭⲓ ⲏⲗⲏⲗⲏⲑ ⲟⲩϩⲟⲣ‐ <text:line-break/><text:span text:style-name="T1"> </text:span><text:span text:style-name="T2">(29/12) </text:span> ⲙ[ⲏ] ⲙ̣ⲛ ⲟⲩϭⲱⲣϭ ϩⲁ ϯⲙⲛⲧⲙⲉ· <text:line-break/><text:span text:style-name="T1"> </text:span><text:span text:style-name="T2">(29/13) </text:span> ⲡ[ⲓϥ]ⲧⲟⲟ̣ⲩ ⲇⲉ ⲥⲉϣⲟⲟⲡ’ ⲉϩ̣ⲉⲛ‐ <text:line-break/><text:span text:style-name="T1"> </text:span><text:span text:style-name="T2">(29/14) </text:span> ϣ̣[ⲁ]ϫⲉ ⲛ[ⲉ ⲛ]ⲧ̣ⲉ ϯⲙⲛⲧⲙⲉ ⲙⲛ ⲟⲩ‐ <text:line-break/><text:span text:style-name="T1"> </text:span><text:span text:style-name="T2">(29/15) </text:span> ⲅ[ⲛ]ⲱⲥⲓ̣[ⲥ] ⲥ̣[ⲉϣ]ⲟⲟⲡ’ ⲇⲉ ⲉⲛⲛⲁⲡⲓ‐ <text:line-break/><text:soft-page-break/><text:span text:style-name="T1"> </text:span><text:span text:style-name="T2">(29/16) </text:span> ⲡⲣ[ⲱ]ⲧⲟⲫ[ⲁⲛⲏ]ⲥ ⲁⲛ ⲛⲉ· ⲁⲗⲗⲁ ⲛⲁ‐ <text:line-break/><text:span text:style-name="T1"> </text:span><text:span text:style-name="T2">(29/17) </text:span> ϯⲙⲁⲁⲩ [ⲛⲉ ⲟ]ⲩⲙⲉⲉⲩⲉ ⲇⲉ ⲛⲧⲉ <text:line-break/><text:span text:style-name="T1"> </text:span><text:span text:style-name="T2">(29/18) </text:span> ⲡⲓⲛⲟⲩⲥ ⲛ ⲧ[ⲉⲗⲓ]ⲟⲥ ⲛⲧⲉ ⲡⲟⲩⲟ‐ <text:line-break/><text:span text:style-name="T1"> </text:span><text:span text:style-name="T2">(29/19) </text:span> ⲉⲓⲛ ⲉ ⲧⲣⲉⲛⲓⲯⲩ̣[ⲭ]ⲏ̣ ⲛⲛ ⲁⲧⲙⲟⲩ <text:line-break/><text:span text:style-name="T1"> </text:span><text:span text:style-name="T2">(29/20) </text:span> ϣ̣ⲱⲡ’ ⲉⲣⲟⲟⲩ [ⲛ] ⲟⲩⲅⲛⲱⲥⲓⲥ· <text:line-break/><text:span text:style-name="T1"> </text:span><text:span text:style-name="T2">(29/21) </text:span> [.]ⲛ.[.]ⲩ̣[.....]ⲉ ⲛⲁⲓ̈ ⲡⲓⲁⲩⲧⲟⲅⲉ‐ <text:line-break/><text:span text:style-name="T1"> </text:span><text:span text:style-name="T2">(29/22) </text:span> [ⲛⲏⲥ.......]ⲟ̣̅ ⲣ̅ⲥ̅ⲉ̣̅̅ [.]ⲟ̅ⲁⲥ̅ ⲟⲩⲱ‐ <text:line-break/><text:span text:style-name="T1"> </text:span><text:span text:style-name="T2">(29/23) </text:span> ⲛϩ [....].[....]ⲟ̣ⲙ ⲡ̣[..]. ⲧⲏⲣⲟⲩ <text:line-break/><text:span text:style-name="T1"> </text:span><text:span text:style-name="T2">(29/24) </text:span> ⲟⲩϣⲁϫⲉ ⲡ̣[ⲉ .]ⲉ ⲛ [...]ⲣⲟⲥ ⲛ‐ <text:line-break/><text:span text:style-name="T1"> </text:span><text:span text:style-name="T2">(29/25) </text:span> ⲛ ⲁⲧ’ϣⲁϫ[ⲉ ........ ϯⲙ]ⲛⲧⲙⲉ· <text:line-break/><text:span text:style-name="T1"> </text:span><text:span text:style-name="T2">(29/26) </text:span> ⲡⲏ ⲉⲧ’ϣⲁϫ̣[ⲉ......ⲟⲩⲱ]ⲛϩ <text:line-break/><text:span text:style-name="T1"> </text:span><text:span text:style-name="T2">(29/27) </text:span> ⲉⲃⲟⲗ ⲉⲧⲃⲉ ⲡ.[........].ⲩⲥ <text:line-break/><text:span text:style-name="T1"> </text:span><text:span text:style-name="T2">(29/28) </text:span> ϫⲉ ⲉϥϣⲟⲟⲡ’ ⲛ [........]ϣⲟ‐ <text:line-break/><text:span text:style-name="T1"> </text:span><text:span text:style-name="T2">(29/29) </text:span> ⲟⲡ’ ⲛⲥⲁ ⲡϣⲱⲓ̈ ϩⲛ [......] ⲁⲧ’‐ <text:line-break/><text:span text:style-name="T1"> </text:span><text:span text:style-name="T2">(30/1) </text:span> ⲡⲟ̣[.....]ⲟⲧⲡ’ ϩⲛ ⲟⲩⲛⲟⲩϩⲃ ⲛⲧⲟⲥ̣ <text:line-break/><text:span text:style-name="T1"> </text:span><text:span text:style-name="T2">(30/2) </text:span> ⲛ [.....]..ⲥ· ⲛϩⲣⲁⲓ̈ ϩⲛ ⲟⲩ〈ⲟⲩ〉ⲟ[ⲉ]ⲓ̣ⲛ ⲛ̣ <text:line-break/><text:span text:style-name="T1"> </text:span><text:span text:style-name="T2">(30/3) </text:span> ⲛ[....]ⲛ ⲙⲛ ⲟⲩⲙⲉⲉⲩⲉ ⲛϩⲣⲁ̣ⲓ̈ ϩⲛ <text:line-break/><text:span text:style-name="T1"> </text:span><text:span text:style-name="T2">(30/4) </text:span> ⲟ[ⲩ... ⲛ]ⲧ̣ⲁϥ· ⲁ̅ⲇ̅ⲁ̅ⲙ̅ⲁ̅ⲥ̅ ⲇⲉ ⲡ[ⲓ]ⲧⲉ[ⲗⲓ]‐ <text:line-break/><text:span text:style-name="T1"> </text:span><text:span text:style-name="T2">(30/5) </text:span> ⲟ[ⲥ] ⲛ ⲣⲱⲙⲉ̣ ⲉ̣ⲩⲃⲁⲗ ⲡⲉ̣ ⲛⲧⲉ̣ ⲡ̣ⲓ̣ⲁ̣ⲩ̣[ⲧ]ⲟ̣‐ <text:line-break/><text:span text:style-name="T1"> </text:span><text:span text:style-name="T2">(30/6) </text:span> ⲅⲉⲛⲏⲥ· ⲟⲩⲅⲛⲱⲥⲓⲥ ⲛ̣̅ⲧⲁϥ ⲡⲉ̣ ⲉϥⲉⲗϥ <text:line-break/><text:span text:style-name="T1"> </text:span><text:span text:style-name="T2">(30/7) </text:span> ϫⲉ ⲡⲓⲁⲩⲧⲟⲅ[ⲉ]ⲛ̣ⲏⲥ ⲛ̅ ⲛⲟⲩⲧⲉ ⲟⲩ‐ <text:line-break/><text:span text:style-name="T1"> </text:span><text:span text:style-name="T2">(30/8) </text:span> ϣⲁϫⲉ ⲡⲉ̣ ⲛⲧⲉ [ⲡ]ⲓⲛⲟ̣ⲩⲥ ⲛ ⲧ̣ⲉ[ⲗ]ⲓ̣ⲟⲥ <text:line-break/><text:span text:style-name="T1"> </text:span><text:span text:style-name="T2">(30/9) </text:span> ⲛⲧⲉ ϯⲙⲛⲧⲙ̣ⲉ· ⲡⲓϣⲏⲣⲉ ⲇⲉ ⲛⲧⲉ <text:line-break/><text:span text:style-name="T1"> </text:span><text:span text:style-name="T2">(30/10) </text:span> §ⲁ̅ⲇ̅ⲁ̅ⲙ̅ⲁ̅ⲛ̅ ⲥ̅ⲏⲑ̅ ⲉϥ̣ⲛⲛⲏⲩ ⲉϩⲣⲁⲓ̈ ⲉ ⲧⲟⲩ‐ <text:line-break/><text:span text:style-name="T1"> </text:span><text:span text:style-name="T2">(30/11) </text:span> ⲉⲓ ⲧⲟⲩⲉⲓ ⲛⲧⲉ ⲛⲓ̣ⲯ̣ⲩⲭⲏ· ⲉⲩ[ⲅ]ⲛⲱⲥⲓⲥ <text:line-break/><text:span text:style-name="T1"> </text:span><text:span text:style-name="T2">(30/12) </text:span> ⲡⲉ ⲉϥⲣⲱϣⲉ ⲉ ⲛⲁⲓ̈· ⲁⲩⲱ ⲉⲧ̣ⲃⲉ ⲡⲁⲓ̈ <text:line-break/><text:span text:style-name="T1"> </text:span><text:span text:style-name="T2">(30/13) </text:span> ⲁⲥϣⲱⲡⲉ ⲉⲃⲟⲗ ⲙⲙⲟϥ ⲛϭⲓ [ϯⲥⲡ]ⲟⲣⲁ <text:line-break/><text:span text:style-name="T1"> </text:span><text:span text:style-name="T2">(30/14) </text:span> ⲉⲧⲟⲛϩ̣· ʹ264ʹ264 ⲙ̅ⲕ̅ⲣ̅ⲟ̅ⲑ̅ⲉ̅ⲁ̅ ⲇ[ⲉ] ⲧⲉ̣ [...] ⲧ[ <text:line-break/><text:span text:style-name="T1"> </text:span><text:span text:style-name="T2">(30/15) </text:span> ⲡⲓⲁⲩⲧⲟⲅⲉⲛⲏⲥ ⲛ [ⲛⲟ]ⲩⲧⲉ ⲟ[ⲩ.. <text:line-break/><text:span text:style-name="T1"> </text:span><text:span text:style-name="T2">(30/16) </text:span> ⲉⲃⲟⲗ ⲛϩⲏⲧⲥ ⲙⲛ .̅.̅[....] ⲉⲩ̣[ⲙ]ⲉⲉⲩ[ⲉ <text:line-break/><text:span text:style-name="T1"> </text:span><text:span text:style-name="T2">(30/17) </text:span> ⲇⲉ ⲛⲧⲉ ⲡⲓⲛⲟⲩ[ⲥ ⲛ] ⲧ̣ⲉⲗⲓⲟⲥ ⲉⲧⲃⲉ <text:line-break/><text:span text:style-name="T1"> </text:span><text:span text:style-name="T2">(30/18) </text:span> ⲧⲉⲧⲉ ⲧⲱⲥ ⲛ ϩⲩ[ⲡⲁⲣⲝ]ⲓ̣ⲥ ϫ[ⲉ] ⲟ̣ⲩ ⲧⲉ <text:line-break/><text:span text:style-name="T1"> </text:span><text:span text:style-name="T2">(30/19) </text:span> ⲏ%0 ϫⲉ̣ ⲛⲉⲥϣⲟⲟⲡ’ [.. ⲛⲁ]ϣ ⲛ ⲣⲏⲧⲉ <text:line-break/><text:span text:style-name="T1"> </text:span><text:span text:style-name="T2">(30/20) </text:span> ⲁⲩⲱ ϫⲉ ⲥϣⲟ̣[ⲟⲡ’] ⲉⲧⲃⲉ ⲡⲁⲓ̈ ⲙⲉⲛ <text:line-break/><text:span text:style-name="T1"> </text:span><text:span text:style-name="T2">(30/21) </text:span> ⲡⲓⲁⲩⲧⲟⲅⲉⲛ[ⲏ]ⲥ̣ ⲛ ⲛⲟⲩⲧⲉ ⲟⲩϣⲁ‐ <text:line-break/><text:span text:style-name="T1"> </text:span><text:span text:style-name="T2">(30/22) </text:span> ϫⲉ ⲡⲉ ⲙⲛ ⲟⲩ[ⲅ]ⲛ̣ⲱ̣ⲥ̣ⲓⲥ· ⲁⲩⲱ̣ ϯ̣‐ <text:line-break/><text:span text:style-name="T1"> </text:span><text:span text:style-name="T2">(30/23) </text:span> ⲅⲛⲱⲥⲓⲥ ⲙⲉⲛ [ ϣⲁ]‐ <text:line-break/><text:span text:style-name="T1"> </text:span><text:span text:style-name="T2">(30/24) </text:span> ϫⲉ· ⲉⲧⲃ[ⲉ] ⲡ̣ⲁⲓ̈ .[......... <text:line-break/><text:span text:style-name="T1"> </text:span><text:span text:style-name="T2">(30/25) </text:span> ⲁ̅ⲇ̅ⲁ̅ⲙ̅ⲁ̅[...]ⲡⲗ[....].[...]ⲙⲁ̣[ <text:line-break/><text:span text:style-name="T1"> </text:span><text:span text:style-name="T2">(30/26) </text:span> ⲧⲉ ⲛⲓ[ϩⲁ]ⲡ̣ⲗⲟ̣[ⲩⲛ] ⲉⲧⲁⲥⲟⲩⲱⲛ[ϩ] <text:line-break/><text:span text:style-name="T1"> </text:span><text:span text:style-name="T2">(30/27) </text:span> ⲉⲃⲟ̣[ⲗ.......ⲟⲩ]ϣⲓⲃⲉ ⲛⲧⲉ ⲛ[ⲓ]‐ <text:line-break/><text:span text:style-name="T1"> </text:span><text:span text:style-name="T2">(30/28) </text:span> ⲯⲩ[ⲭⲏ.......]ⲉ ϩⲱⲱⲥ ⲧⲉ̣[.].̅[ <text:line-break/><text:span text:style-name="T1"> </text:span><text:span text:style-name="T2">(30/29) </text:span> ⲧⲉ̣[........ⲧ]ⲉⲗⲓⲟⲥ· ⲉⲧⲃⲉ ⲛ[ⲓ]‐ <text:line-break/><text:span text:style-name="T1"> </text:span><text:span text:style-name="T2">(30/30) </text:span> ⲧⲉ̣[ⲗⲓⲟⲥ ...] ⲛⲓⲙⲛⲧ’ⲁⲅⲅⲉⲗⲟⲥ <text:line-break/><text:span text:style-name="T1"> </text:span><text:span text:style-name="T2">(31/1) </text:span> [....]ϣⲉⲛⲥⲟ̣[......... <text:line-break/><text:span text:style-name="T1"> </text:span><text:span text:style-name="T2">(31/2) </text:span> [...]ⲱⲡⲉ ⲟⲩⲛ[........ <text:line-break/><text:span text:style-name="T1"> </text:span><text:span text:style-name="T2">(31/3) </text:span> [.ⲯ]ⲩⲭⲏ ⲛ̣ⲛ[......... <text:line-break/><text:soft-page-break/><text:span text:style-name="T1"> </text:span><text:span text:style-name="T2">(31/4) </text:span> [....]ⲙⲟⲩ ⲁⲩ[........ <text:line-break/><text:span text:style-name="T1"> </text:span><text:span text:style-name="T2">(31/5) </text:span> [.......].ⲡⲓ[..]ⲙⲟⲥ ⲛⲛ <text:line-break/><text:span text:style-name="T1"> </text:span><text:span text:style-name="T2">(31/6) </text:span> [.........]ⲛ. [ⲛⲓⲁⲛ]ⲧⲓⲧⲩⲡⲟⲥ <text:line-break/><text:span text:style-name="T1"> </text:span><text:span text:style-name="T2">(31/7) </text:span> [ ⲟ]ⲛ̣ⲧⲱⲥ <text:line-break/><text:span text:style-name="T1"> </text:span><text:span text:style-name="T2">(31/8) </text:span> [..........]ⲟⲡ̣[..]ⲥ̣ⲓⲥ ⲉⲧ’ϣⲟ‐ <text:line-break/><text:span text:style-name="T1"> </text:span><text:span text:style-name="T2">(31/9) </text:span> [........]ⲛ ϯⲙⲉⲧⲁⲛⲟⲓⲁ <text:line-break/><text:span text:style-name="T1"> </text:span><text:span text:style-name="T2">(31/10) </text:span> [........]ⲁⲓ̈ ⲉ ⲡⲉⲓ̈ⲙⲁ ⲉϩⲣⲁⲓ̈ <text:line-break/><text:span text:style-name="T1"> </text:span><text:span text:style-name="T2">(31/11) </text:span> [......].ⲉⲧ’ϣⲟⲟⲡ’ ⲛ ⲁⲩ‐ <text:line-break/><text:span text:style-name="T1"> </text:span><text:span text:style-name="T2">(31/12) </text:span> [......] ⲛⲛ ⲉⲱⲛ· ⲉϣⲱⲡⲉ <text:line-break/><text:span text:style-name="T1"> </text:span><text:span text:style-name="T2">(31/13) </text:span> [........]ⲛⲉ ⲁⲩⲱ ⲉⲥⲣ ⲁⲅ̣[ⲁ]ⲡⲁⲛ <text:line-break/><text:span text:style-name="T1"> </text:span><text:span text:style-name="T2">(31/14) </text:span> [.......] ⲉ̣ⲥ̣ⲁϩⲉⲣⲁⲧⲥ ϩⲓϫⲛ <text:line-break/><text:span text:style-name="T1"> </text:span><text:span text:style-name="T2">(31/15) </text:span> [.]ⲙⲉ[.....] ⲛⲛ ⲉⲱⲛ ⲉⲩⲛ‐ <text:line-break/><text:span text:style-name="T1"> </text:span><text:span text:style-name="T2">(31/16) </text:span> [ⲧⲁⲥ] ⲙⲙ[ⲁⲩ ⲙ] ⲡ̣ⲓⲫⲱⲥⲧⲏⲣ ⲏʹ265 <text:line-break/><text:span text:style-name="T1"> </text:span><text:span text:style-name="T2">(31/17) </text:span> [ⲗ̅ⲏ̅]ⲗ̅ⲏ̅ⲑ̅ [....]ϣⲱⲡⲉ ⲛ ⲟⲩⲁⲛ <text:line-break/><text:span text:style-name="T1"> </text:span><text:span text:style-name="T2">(31/18) </text:span> [...]ⲣⲉϥⲛⲁ[ⲩ ⲉ ⲛ]ⲟⲩⲧⲉ· ⲉϣ̣ⲱ‐ <text:line-break/><text:span text:style-name="T1"> </text:span><text:span text:style-name="T2">(31/19) </text:span> [ⲡⲉ ⲇ]ⲉ ⲉⲥⲣ ϩⲉⲗ̣[ⲡⲓ]ⲥ ⲁⲩⲱ ⲉⲥⲉⲓ‐ <text:line-break/><text:span text:style-name="T1"> </text:span><text:span text:style-name="T2">(31/20) </text:span> ⲱⲣϩ· ⲟⲩⲁ[.....]ⲥ ⲇⲉ ⲛ ⲅⲉⲛⲟⲥ <text:line-break/><text:span text:style-name="T1"> </text:span><text:span text:style-name="T2">(31/21) </text:span> [ ⲁϩ]ⲉⲣⲁⲧⲥ ϩⲓϫⲛ <text:line-break/><text:span text:style-name="T1"> </text:span><text:span text:style-name="T2">(31/22) </text:span> [ ]ⲧⲁⲥ ⲙⲙⲁⲩ <text:line-break/><text:span text:style-name="T1"> </text:span><text:span text:style-name="T2">(31/23) </text:span> [ ]ⲑ̣‐· ⲉϣⲱ <text:line-break/><text:span text:style-name="T1"> </text:span><text:span text:style-name="T2">(31/24) </text:span> [ⲡⲉ ]ⲟⲥ ϩⲱ <text:line-break/><text:span text:style-name="T1"> </text:span><text:span text:style-name="T2">(31/25) </text:span> [ ]ϣ̣ⲁⲥ <text:line-break/><text:span text:style-name="T1"> </text:span><text:span text:style-name="T2">(31/26) </text:span> [ ]ⲟⲩ <text:line-break/><text:span text:style-name="T1"> </text:span><text:span text:style-name="T2">(31/27) </text:span> [ ]. <text:line-break/><text:span text:style-name="T1"> </text:span><text:span text:style-name="T2">(31/28) </text:span> [ ]. <text:line-break/><text:span text:style-name="T1"> </text:span><text:span text:style-name="T2">(31/29) </text:span> [ ]ⲁⲩ <text:line-break/><text:span text:style-name="T1"> </text:span><text:span text:style-name="T2">(32/1) </text:span> [.........]ⲥ̣ϩⲟⲧⲡ’ ⲙ[.... <text:line-break/><text:span text:style-name="T1"> </text:span><text:span text:style-name="T2">(32/2) </text:span> [.........]ⲉ̣ⲥⲁϩⲉⲣⲁⲧ̣[ⲥ.. <text:line-break/><text:span text:style-name="T1"> </text:span><text:span text:style-name="T2">(32/3) </text:span> [ ]ⲣⲡ’ ⲛⲛ [... <text:line-break/><text:span text:style-name="T1"> </text:span><text:span text:style-name="T2">(32/4) </text:span> [.........]ⲁ̣ⲩ ⲙ ⲡⲓⲫ[ⲱⲥ]‐ <text:line-break/><text:span text:style-name="T1"> </text:span><text:span text:style-name="T2">(32/5) </text:span> ⲧⲏⲣ ⲁ̅ⲣ̅[̅ⲙ̅ⲟ̅ⲍ̅ⲏ̅ⲗ̅ <text:line-break/><text:span text:style-name="T1"> </text:span><text:span text:style-name="T2">(32/6) </text:span> ⲡⲉ ⲛ ⲟⲩⲁ[ <text:line-break/><text:span text:style-name="T1"> </text:span><text:span text:style-name="T2">(32/7) </text:span> §ⲥⲙⲟ[.].[ <text:line-break/><text:span text:style-name="T1"> </text:span><text:span text:style-name="T2">(32/8) </text:span> ⲉϩⲣⲁⲓ̈ ⲉ̣ϫ̣[ⲛ] ϯϭ[ⲟⲙ ....... <text:line-break/><text:span text:style-name="T1"> </text:span><text:span text:style-name="T2">(32/9) </text:span> ⲁϩⲉⲣⲁⲧⲕ ϩⲓϫ[ⲛ <text:line-break/><text:span text:style-name="T1"> </text:span><text:span text:style-name="T2">(32/10) </text:span> ⲡⲓⲟⲩⲟⲉⲓⲛ ⲉⲧ̣[......... <text:line-break/><text:span text:style-name="T1"> </text:span><text:span text:style-name="T2">(32/11) </text:span> ⲁⲩⲱ ⲛ ⲁⲧ’ϯ ϣ̣[ⲓ] ⲉⲣ[ⲟ%1...... <text:line-break/><text:span text:style-name="T1"> </text:span><text:span text:style-name="T2">(32/12) </text:span> ⲛⲟϭ ⲡⲉ ⲡⲓⲁⲓ̣ⲱ̣ⲛ· ⲁ[...... <text:line-break/><text:span text:style-name="T1"> </text:span><text:span text:style-name="T2">(32/13) </text:span> ⲧⲁ[..] ⲛ ⲛⲏ ⲙⲁⲩⲁⲁⲩ̣ [...... <text:line-break/><text:span text:style-name="T1"> </text:span><text:span text:style-name="T2">(32/14) </text:span> ⲃⲟⲗ ϩⲙ ⲡⲓⲧⲉⲗⲓⲟ̣[ⲥ ........ <text:line-break/><text:span text:style-name="T1"> </text:span><text:span text:style-name="T2">(32/15) </text:span> ϭⲟⲙ ⲉⲧⲙⲙⲁⲩ̣ [....]ⲧ̣ⲉ.[.. <text:line-break/><text:span text:style-name="T1"> </text:span><text:span text:style-name="T2">(32/16) </text:span> ϣϭⲟⲙ· ⲏ%0 ⲙⲙ[...]ϣ̣ⲱ[... <text:line-break/><text:span text:style-name="T1"> </text:span><text:span text:style-name="T2">(32/17) </text:span> ϣϭⲟⲙ ⲛⲧⲉ ⲟⲩ[....]ⲟⲛ[... <text:line-break/><text:span text:style-name="T1"> </text:span><text:span text:style-name="T2">(32/18) </text:span> ⲛ[ⲓ]ⲙ ⲛⲧⲉ ⲧⲉϥⲯ̣[ⲩ]ⲭⲏ .ⲛ ⲁ[.... <text:line-break/><text:span text:style-name="T1"> </text:span><text:span text:style-name="T2">(32/19) </text:span> [ⲉ]ⲥ̣ⲑⲏⲧⲟⲛ [...]ⲁ̣ⲁϥ ⲁⲛ ⲙⲛ [... <text:line-break/><text:span text:style-name="T1"> </text:span><text:span text:style-name="T2">(32/20) </text:span> ⲑⲙⲓⲕⲟⲛ· ⲁⲗ[ⲗⲁ .]ⲕⲉⲁⲧ’ ϫⲟ̣[.. <text:line-break/><text:span text:style-name="T1"> </text:span><text:span text:style-name="T2">(32/21) </text:span> ⲛ ⲕⲁⲧⲁ ⲟⲩⲁ̣ [.....].ⲥ[..]ⲁ .[.. <text:line-break/><text:soft-page-break/><text:span text:style-name="T1"> </text:span><text:span text:style-name="T2">(32/22) </text:span> ⲉⲙⲛ ⲗⲁⲁⲩ [.........].[.. <text:line-break/><text:span text:style-name="T1"> </text:span><text:span text:style-name="T2">(32/23) </text:span> ⲙⲙⲟϥ· [ <text:line-break/><text:span text:style-name="T1"> </text:span><text:span text:style-name="T2">(32/24) </text:span> ⲉⲧϥ[ <text:line-break/><text:span text:style-name="T1"> </text:span><text:span text:style-name="T2">(32/25) </text:span> ⲙ ⲟⲛ̣[ <text:line-break/><text:span text:style-name="T1"> </text:span><text:span text:style-name="T2">(32/26) </text:span> ⲁⲩ[ <text:line-break/><text:span text:style-name="T1"> </text:span><text:span text:style-name="T2">(32/27) </text:span> ⲥ[ <text:line-break/><text:span text:style-name="T1"> </text:span><text:span text:style-name="T2">(32/28) </text:span> ϩ[ⲛ <text:line-break/><text:span text:style-name="T1"> </text:span><text:span text:style-name="T2">(32/29) </text:span> [ <text:line-break/><text:span text:style-name="T1"> </text:span><text:span text:style-name="T2">(33/1) </text:span> ⲁⲩⲱ ⲛⲛ ⲁⲧⲥⲱ̣[.......ϩ]ⲓ‐ <text:line-break/><text:span text:style-name="T1"> </text:span><text:span text:style-name="T2">(33/2) </text:span> [ϫ]ⲛ ⲟ̣ⲩⲟⲛ ⲛⲓⲙ [ ]ⲛ <text:line-break/><text:span text:style-name="T1"> </text:span><text:span text:style-name="T2">(33/3) </text:span> [...]ⲛ ⲛⲓⲙ [.]ⲁ[ ]ⲥⲡⲉ <text:line-break/><text:span text:style-name="T1"> </text:span><text:span text:style-name="T2">(33/4) </text:span> [....]ⲧ’ⲙⲟ̣ⲣ̣ⲫⲏ [.......]..[.] ⲙ <text:line-break/><text:span text:style-name="T1"> </text:span><text:span text:style-name="T2">(33/5) </text:span> [........] ⲛⲛ ⲁ[....]ⲓ̣ⲟ ⲙⲛ ⲡⲁⲓ̈ <text:line-break/><text:span text:style-name="T1"> </text:span><text:span text:style-name="T2">(33/6) </text:span> [..........]ⲧ’ [....]ⲁ̣ ⲙⲛ ⲡⲉⲓ̈ⲧⲩ‐ <text:line-break/><text:span text:style-name="T1"> </text:span><text:span text:style-name="T2">(33/7) </text:span> [ⲡⲟⲥ...ⲙ]ⲛ ⲗⲁⲁⲩ ⲛ <text:line-break/><text:span text:style-name="T1"> </text:span><text:span text:style-name="T2">(33/8) </text:span> [ ϣⲁ ⲉ]ⲛⲉϩ· ⲟⲩⲧⲉ <text:line-break/><text:span text:style-name="T1"> </text:span><text:span text:style-name="T2">(33/9) </text:span> [ ]ⲉ̣ⲧⲉ ⲟⲩⲧⲏⲣϥ ⲉ <text:line-break/><text:span text:style-name="T1"> </text:span><text:span text:style-name="T2">(33/10) </text:span> [ ]. ⲁ̣ⲧⲱϫⲛ ⲙ ⲡ̣ⲉⲉⲓ‐ <text:line-break/><text:span text:style-name="T1"> </text:span><text:span text:style-name="T2">(33/11) </text:span> [ ]ⲙ ⲉϥⲁⲥⲓⲏⲟⲩⲧ’ <text:line-break/><text:span text:style-name="T1"> </text:span><text:span text:style-name="T2">(33/12) </text:span> [ ]ⲡ̣ⲓⲧⲉⲗⲓⲟ[ⲥ] ⲛ ⲛⲟⲩⲥ· <text:line-break/><text:span text:style-name="T1"> </text:span><text:span text:style-name="T2">(33/13) </text:span> [ ]ⲉ ⲛⲛ ⲁⲧ’ⲡⲱϣ <text:line-break/><text:span text:style-name="T1"> </text:span><text:span text:style-name="T2">(33/14) </text:span> [ ⲟⲩ]ⲟ̣ⲉⲓⲛ ⲛ ⲧⲉⲗⲓⲟⲥ ⲛ <text:line-break/><text:span text:style-name="T1"> </text:span><text:span text:style-name="T2">(33/15) </text:span> [ ]ϥϣⲟⲟⲡ’ ⲇⲉ ϩⲙ <text:line-break/><text:span text:style-name="T1"> </text:span><text:span text:style-name="T2">(33/16) </text:span> [ ⲁ]ⲇ̣ⲁ̣ⲙⲁⲥ· ⲁⲩⲱ <text:line-break/><text:span text:style-name="T1"> </text:span><text:span text:style-name="T2">(33/17) </text:span> [ ⲡ]ⲓⲁⲩⲧⲟⲅ̣ⲉ‐ <text:line-break/><text:span text:style-name="T1"> </text:span><text:span text:style-name="T2">(33/18) </text:span> [ⲛⲏⲥ ⲁ]ⲩ̣ⲱ ϣⲁϥⲃⲱⲕ <text:line-break/><text:span text:style-name="T1"> </text:span><text:span text:style-name="T2">(33/19) </text:span> [ ⲧⲉⲗⲓ]ⲟ̣ⲥ ⲛ ⲛⲟⲩⲥ <text:line-break/><text:span text:style-name="T1"> </text:span><text:span text:style-name="T2">(33/20) </text:span> [ ] ⲡⲓⲕ̅ⲗ̅ⲥ̅ ⲛ ⲛⲟⲩ‐ <text:line-break/><text:span text:style-name="T1"> </text:span><text:span text:style-name="T2">(33/21) </text:span> [ ]ⲡ’ ⲛ ⲉⲓⲙⲉ <text:line-break/><text:span text:style-name="T1"> </text:span><text:span text:style-name="T2">(33/22) </text:span> [ ]ⲙ· ⲁⲗⲗⲁ <text:line-break/><text:span text:style-name="T1"> </text:span><text:span text:style-name="T2">(33/23) </text:span> [ ⲯⲩ]ⲭ̣ⲏ ⲉ <text:line-break/><text:span text:style-name="T1"> </text:span><text:span text:style-name="T2">(33/24) </text:span> [ ]ⲙⲁⲩ <text:line-break/><text:span text:style-name="T1"> </text:span><text:span text:style-name="T2">(33/25) </text:span> [ ]ⲱ <text:line-break/><text:span text:style-name="T1"> </text:span><text:span text:style-name="T2">(33/26) </text:span> [ ]ⲛϩ <text:line-break/><text:span text:style-name="T1"> </text:span><text:span text:style-name="T2">(33/27) </text:span> [ ] <text:line-break/><text:span text:style-name="T1"> </text:span><text:span text:style-name="T2">(33/28) </text:span> [ ]ⲥ <text:line-break/><text:span text:style-name="T1"> </text:span><text:span text:style-name="T2">(34/1) </text:span> .[.........] ⲛ ϩⲩⲡⲁⲣⲝⲓⲥ <text:line-break/><text:span text:style-name="T1"> </text:span><text:span text:style-name="T2">(34/2) </text:span> [........ ⲉ]ⲃⲟⲗ ⲉⲥⲛⲧ̣ⲁ̣ⲩ <text:line-break/><text:span text:style-name="T1"> </text:span><text:span text:style-name="T2">(34/3) </text:span> [..........].[.]ⲩ̣ⲛⲉ̣[... <text:line-break/><text:span text:style-name="T1"> </text:span><text:span text:style-name="T2">(34/4) </text:span> .[.........] ϩⲉ̣ⲛ̣ⲙⲉϩⲃ̣̅ [ⲛ] <text:line-break/><text:span text:style-name="T1"> </text:span><text:span text:style-name="T2">(34/5) </text:span> [ϭⲟ]ⲙ ⲙⲛ [...] ⲡⲁ[ <text:line-break/><text:span text:style-name="T1"> </text:span><text:span text:style-name="T2">(34/6) </text:span> ⲙⲉϩⲅ̅ ⲇⲉ̣ [..]ⲉⲛ[ <text:line-break/><text:span text:style-name="T1"> </text:span><text:span text:style-name="T2">(34/7) </text:span> ⲱⲛϩ ⲉⲃⲟⲗ̣ [ <text:line-break/><text:span text:style-name="T1"> </text:span><text:span text:style-name="T2">(34/8) </text:span> ⲉⲧⲉ ⲛ[ <text:line-break/><text:span text:style-name="T1"> </text:span><text:span text:style-name="T2">(34/9) </text:span> ⲟⲩ ⲛ ⲟⲩ[ <text:line-break/><text:span text:style-name="T1"> </text:span><text:span text:style-name="T2">(34/10) </text:span> ϩⲉ ⲛ ⲯⲩⲭⲏ· ⲁ[......... <text:line-break/><text:span text:style-name="T1"> </text:span><text:span text:style-name="T2">(34/11) </text:span> ϭⲉ ⲛⲓⲁⲓⲱⲛ ⲇ̣ⲉ̣ [......... <text:line-break/><text:soft-page-break/><text:span text:style-name="T1"> </text:span><text:span text:style-name="T2">(34/12) </text:span> ⲙⲁ ⲛ ϣⲱⲡⲉ .[......... <text:line-break/><text:span text:style-name="T1"> </text:span><text:span text:style-name="T2">(34/13) </text:span> ⲯⲩⲭ̣ⲏ ⲙⲛ ϩⲉⲛ̣[......... <text:line-break/><text:span text:style-name="T1"> </text:span><text:span text:style-name="T2">(34/14) </text:span> ϩ[ⲉ]ⲛ̣[ⲛ]ⲟⲩⲧⲉ ⲛ[......... <text:line-break/><text:span text:style-name="T1"> </text:span><text:span text:style-name="T2">(34/15) </text:span> ϫⲟⲥⲉ ⲉ ⲛⲟⲩⲧⲉ̣ [........ <text:line-break/><text:span text:style-name="T1"> </text:span><text:span text:style-name="T2">(34/16) </text:span> ⲛⲧⲉ ⲛⲓⲁⲩⲧⲟ[ⲅⲉⲛⲏⲥ .... <text:line-break/><text:span text:style-name="T1"> </text:span><text:span text:style-name="T2">(34/17) </text:span> ⲙⲙⲁⲩ ⲙ ⲡⲓⲁⲩ̣[ⲧⲟⲅⲉⲛⲏⲥ .. <text:line-break/><text:span text:style-name="T1"> </text:span><text:span text:style-name="T2">(34/18) </text:span> ⲛ ϣⲟⲣⲡ’ ⲛ ⲛⲟⲩ̣[......... <text:line-break/><text:span text:style-name="T1"> </text:span><text:span text:style-name="T2">(34/19) </text:span> ⲛ ⲁ̣ⲅⲅⲉⲗ[ⲟ]ⲥ̣ [ <text:line-break/><text:span text:style-name="T1"> </text:span><text:span text:style-name="T2">(34/20) </text:span> ⲛ̣ ⲁϩⲟⲣⲁⲧⲟ̣[ⲛ <text:line-break/><text:span text:style-name="T1"> </text:span><text:span text:style-name="T2">(34/21) </text:span> ⲉⲃⲟⲗ ⲛ ϩⲉⲛ[ <text:line-break/><text:span text:style-name="T1"> </text:span><text:span text:style-name="T2">(34/22) </text:span> ⲯⲩⲭⲏ ⲙⲛ [ <text:line-break/><text:span text:style-name="T1"> </text:span><text:span text:style-name="T2">(34/23) </text:span> ⲛⲛ ⲉⲱⲛ .[ <text:line-break/><text:span text:style-name="T1"> </text:span><text:span text:style-name="T2">(34/24) </text:span> ⲇⲉ ⲉ ϯⲯ[ⲩⲭⲏ <text:line-break/><text:span text:style-name="T1"> </text:span><text:span text:style-name="T2">(34/25) </text:span> ⲁⲅⲅⲉⲗ̣[ⲟⲥ <text:line-break/><text:span text:style-name="T1"> </text:span><text:span text:style-name="T2">(34/26) </text:span> ⲭⲏ ⲙ̣[ <text:line-break/><text:span text:style-name="T1"> </text:span><text:span text:style-name="T2">(34/27) </text:span> ⲅⲉ[ <text:line-break/><text:span text:style-name="T1"> </text:span><text:span text:style-name="T2">(34/28) </text:span> ⲱ̣[ <text:line-break/><text:span text:style-name="T1"> </text:span><text:span text:style-name="T2">(34/29) </text:span> ⲇ[ <text:line-break/><text:span text:style-name="T1"> </text:span><text:span text:style-name="T2">(34/30) </text:span> ⲉ̣[ <text:line-break/><text:span text:style-name="T1"> </text:span><text:span text:style-name="T2">(35/1) </text:span> ⲧ̣ⲁ̣ⲥ ⲙⲙⲁⲩ ⲛ [ ].ⲉ <text:line-break/><text:span text:style-name="T1"> </text:span><text:span text:style-name="T2">(35/2) </text:span> [.]ⲁ̣ⲓ̈ ϣⲁ ⲉ̣ⲛ[ⲉϩ........]ⲉ ⲛ <text:line-break/><text:span text:style-name="T1"> </text:span><text:span text:style-name="T2">(35/3) </text:span> [ⲥ]ⲟⲡ·ʹ264ʹ264 ⲁⲩ̣ⲱ [ ]ⲁ̣ⲏⲏ <text:line-break/><text:span text:style-name="T1"> </text:span><text:span text:style-name="T2">(35/4) </text:span> [..]ⲉ [.....]ϣⲁ̣[....]ⲁ̣ⲧⲥ· ⲉϣⲱ‐ <text:line-break/><text:span text:style-name="T1"> </text:span><text:span text:style-name="T2">(35/5) </text:span> ⲡⲉ ⲇ̣[ⲉ ....]ⲁ̣ⲛ.[...] ⲛϭⲓ ⲟⲩⲯⲩⲭⲏ <text:line-break/><text:span text:style-name="T1"> </text:span><text:span text:style-name="T2">(35/6) </text:span> ⲡ̣ⲁ.[........ ϣ]ⲱ̣ⲡⲉ ⲛ ⲟⲩ‐ <text:line-break/><text:span text:style-name="T1"> </text:span><text:span text:style-name="T2">(35/7) </text:span> ⲁⲅ’[ⲅⲉⲗⲟⲥ...]ⲉ̣ ⲇⲉ ⲛ ⲕⲟⲥ‐ <text:line-break/><text:span text:style-name="T1"> </text:span><text:span text:style-name="T2">(35/8) </text:span> ⲙ̣ⲟ̣ⲥ̣ [.... ⲛⲓⲁⲅ’]ⲅⲉ̣ⲗⲟ̣ⲥ ⲁⲩⲱ ⲛⲓ‐ <text:line-break/><text:span text:style-name="T1"> </text:span><text:span text:style-name="T2">(35/9) </text:span> [ ⲧ]ⲏ ⲉⲧⲟⲩⲁⲁⲃ ⲥⲥⲟ‐ <text:line-break/><text:span text:style-name="T1"> </text:span><text:span text:style-name="T2">(35/10) </text:span> [ ]ⲁ̣ⲓⲱⲛ ⲇⲉ ⲉⲧ’ⲥⲁ <text:line-break/><text:span text:style-name="T1"> </text:span><text:span text:style-name="T2">(35/11) </text:span> [ ⲁⲩⲧⲟⲅ]ⲉⲛⲏⲥ ⲟⲩⲛⲧⲉ <text:line-break/><text:span text:style-name="T1"> </text:span><text:span text:style-name="T2">(35/12) </text:span> [ ]ⲙⲟⲟⲩ ⲡ[....]ⲩ <text:line-break/><text:span text:style-name="T1"> </text:span><text:span text:style-name="T2">(35/13) </text:span> [ ]ⲧⲉ ⲛ ⲁⲣⲭⲱⲛ· <text:line-break/><text:span text:style-name="T1"> </text:span><text:span text:style-name="T2">(35/14) </text:span> [ ] ⲉⲩⲛⲧⲁⲩ ⲙⲙⲁⲩ <text:line-break/><text:span text:style-name="T1"> </text:span><text:span text:style-name="T2">(35/15) </text:span> [ ⲇⲓⲁ]ⲫⲟⲣⲁ· ⲉⲧⲉ ⲉⲧⲃⲏ <text:line-break/><text:span text:style-name="T1"> </text:span><text:span text:style-name="T2">(35/16) </text:span> [ⲏⲧ‐ ] ⲧⲁⲓ̈ ⲁⲛ ⲧⲉ ⲉϣⲁϫⲉ <text:line-break/><text:span text:style-name="T1"> </text:span><text:span text:style-name="T2">(35/17) </text:span> [ ]. ⲛ̣ϩⲟⲟⲩ[.].ⲉ <text:line-break/><text:span text:style-name="T1"> </text:span><text:span text:style-name="T2">(35/18) </text:span> [ ]ⲣⲁϥ· ⲙⲛ <text:line-break/><text:span text:style-name="T1"> </text:span><text:span text:style-name="T2">(35/19) </text:span> [ ⲁⲩⲧⲟⲅⲉⲛ]ⲏⲥ ⲛ ⲛⲟⲩⲧⲉ <text:line-break/><text:span text:style-name="T1"> </text:span><text:span text:style-name="T2">(35/20) </text:span> [ ]ⲉⲧ’ϣⲟⲟⲡ’ <text:line-break/><text:span text:style-name="T1"> </text:span><text:span text:style-name="T2">(35/21) </text:span> [ ]ⲥⲱⲧⲙ <text:line-break/><text:span text:style-name="T1"> </text:span><text:span text:style-name="T2">(35/22) </text:span> [ ⲁ]ⲩ̣[ⲧ]ⲟ̣ⲅⲉⲛⲏⲥ <text:line-break/><text:span text:style-name="T1"> </text:span><text:span text:style-name="T2">(35/23) </text:span> [ ]ⲉ ⲛⲧⲉ <text:line-break/><text:span text:style-name="T1"> </text:span><text:span text:style-name="T2">(35/24) </text:span> [ ]ⲟⲥ <text:line-break/><text:span text:style-name="T1"> </text:span><text:span text:style-name="T2">(35/25) </text:span> [ ] ⲛ <text:line-break/><text:span text:style-name="T1"> </text:span><text:span text:style-name="T2">(35/26) </text:span> [ ]ⲡ’ <text:line-break/><text:span text:style-name="T1"> </text:span><text:span text:style-name="T2">(35/27) </text:span> [ <text:line-break/><text:span text:style-name="T1"> </text:span><text:span text:style-name="T2">(35/28) </text:span> [ <text:line-break/><text:soft-page-break/><text:span text:style-name="T1"> </text:span><text:span text:style-name="T2">(36/1) </text:span> ⲛ ⲧ.[.......]ⲱⲥ ʹ264ʹ264 ⲟⲩⲛⲧ[ⲁ%1.] <text:line-break/><text:span text:style-name="T1"> </text:span><text:span text:style-name="T2">(36/2) </text:span> [ⲙ]ⲙ̣[ⲁⲩ....]. ⲛ ϯϩⲩⲡ[ⲁ]ⲣⲝ̣[ⲓⲥ] <text:line-break/><text:span text:style-name="T1"> </text:span><text:span text:style-name="T2">(36/3) </text:span> .[.........] ⲛⲛ ⲟⲩⲱⲛϩ [. <text:line-break/><text:span text:style-name="T1"> </text:span><text:span text:style-name="T2">(36/4) </text:span> ⲧ[.......]ϣⲟ[ⲟ]ⲡ’ ⲉⲧⲃ̣ⲉ [.. <text:line-break/><text:span text:style-name="T1"> </text:span><text:span text:style-name="T2">(36/5) </text:span> ϣⲁϫⲉ ⲛ[...]ⲥ ⲛ [.....]..[ <text:line-break/><text:span text:style-name="T1"> </text:span><text:span text:style-name="T2">(36/6) </text:span> ⲡⲓⲁⲗⲟⲩ .[..]ⲟⲟ̣[.....]ϩⲟⲟ[ⲩⲧ’] <text:line-break/><text:span text:style-name="T1"> </text:span><text:span text:style-name="T2">(36/7) </text:span> ⲉⲩϭⲟⲧ’̣ ⲡ̣[ ] ⲛⲏ[. <text:line-break/><text:span text:style-name="T1"> </text:span><text:span text:style-name="T2">(36/8) </text:span> ⲛ ⲛⲟⲩ[ ⲁ]ϩⲟⲣⲁ‐ <text:line-break/><text:span text:style-name="T1"> </text:span><text:span text:style-name="T2">(36/9) </text:span> ⲧⲟⲛ ⲙ ⲡ̅ⲛ̣̅ⲁ̅ ⲁ[........].[.. <text:line-break/><text:span text:style-name="T1"> </text:span><text:span text:style-name="T2">(36/10) </text:span> ϩⲙ ⲡⲓⲧⲉⲗⲓⲟ[ⲥ <text:line-break/><text:span text:style-name="T1"> </text:span><text:span text:style-name="T2">(36/11) </text:span> ⲙⲉⲧⲉⲙⲉⲛ. ⲛ̣ .[ <text:line-break/><text:span text:style-name="T1"> </text:span><text:span text:style-name="T2">(36/12) </text:span> ⲙⲛ ⲟⲩⲁⲣⲭⲏ· .[ <text:line-break/><text:span text:style-name="T1"> </text:span><text:span text:style-name="T2">(36/13) </text:span> ⲛ ⲁ̣[ⲅⲁ]ⲡ̣ⲏ ⲙⲛ ⲟ[ⲩ <text:line-break/><text:span text:style-name="T1"> </text:span><text:span text:style-name="T2">(36/14) </text:span> ⲛⲧⲉ̣ ϯⲃ̅ⲁ̅ⲣ̅ⲃ̅ⲏ̅ⲗ̅[̅ⲱ̅ <text:line-break/><text:span text:style-name="T1"> </text:span><text:span text:style-name="T2">(36/15) </text:span> ⲉⲃⲟⲗ ⲙⲛ ⲟⲩⲙ[ <text:line-break/><text:span text:style-name="T1"> </text:span><text:span text:style-name="T2">(36/16) </text:span> §ⲡⲓⲛⲟⲩⲥ ⲛⲧⲉ [ <text:line-break/><text:span text:style-name="T1"> </text:span><text:span text:style-name="T2">(36/17) </text:span> ⲥⲛⲧⲉ ⲛⲉ ⲛⲁⲓ̈ ⲛ [ <text:line-break/><text:span text:style-name="T1"> </text:span><text:span text:style-name="T2">(36/18) </text:span> ⲡ[ⲓ]ⲙⲉⲉⲩⲉ .[ <text:line-break/><text:span text:style-name="T1"> </text:span><text:span text:style-name="T2">(36/19) </text:span> ⲃⲟ̣ⲗ̣ ϩⲙ ⲡⲓⲟ̣[ <text:line-break/><text:span text:style-name="T1"> </text:span><text:span text:style-name="T2">(36/20) </text:span> ϩⲛ ϯⲃ̅ⲁ̅ⲣ̅ⲃ̅ⲏ̅ⲗ̅[̅ⲱ̅ <text:line-break/><text:span text:style-name="T1"> </text:span><text:span text:style-name="T2">(36/21) </text:span> ⲡⲓⲕ̅ⲗ̅ⲥ̅ ⲇⲉ .[ <text:line-break/><text:span text:style-name="T1"> </text:span><text:span text:style-name="T2">(36/22) </text:span> ⲛⲁⲓ̈ ⲧⲏⲣⲟ[ⲩ <text:line-break/><text:span text:style-name="T1"> </text:span><text:span text:style-name="T2">(36/23) </text:span> ⲙ ⲡⲁⲣⲑⲉ[ⲛⲟⲥ <text:line-break/><text:span text:style-name="T1"> </text:span><text:span text:style-name="T2">(36/24) </text:span> ⲁⲥⲟⲩⲉ̣[ <text:line-break/><text:span text:style-name="T1"> </text:span><text:span text:style-name="T2">(36/25) </text:span> ϩⲛ ⲟⲩ[ <text:line-break/><text:span text:style-name="T1"> </text:span><text:span text:style-name="T2">(36/26) </text:span> ⲙⲛ[ <text:line-break/><text:span text:style-name="T1"> </text:span><text:span text:style-name="T2">(36/27) </text:span> ϫⲡ[ <text:line-break/><text:span text:style-name="T1"> </text:span><text:span text:style-name="T2">(36/28) </text:span> ⲅⲁ[ <text:line-break/><text:span text:style-name="T1"> </text:span><text:span text:style-name="T2">(36/29) </text:span> ⲙ[ <text:line-break/><text:span text:style-name="T1"> </text:span><text:span text:style-name="T2">(37/1) </text:span> ϩⲙ ⲡⲏ ⲉⲧⲙⲙⲁ̣[ⲩ ......]. ⲧϭⲟⲙ <text:line-break/><text:span text:style-name="T1"> </text:span><text:span text:style-name="T2">(37/2) </text:span> [.]ⲉ̣.[.]ⲧⲉ ⲡⲏ̣ ⲉ[........] ⲛⲟⲩ‐ <text:line-break/><text:span text:style-name="T1"> </text:span><text:span text:style-name="T2">(37/3) </text:span> ⲉⲃⲟⲗ̣ ϩⲙ ⲡ[.]ⲉ[....... ⲁⲗ]ⲗⲁ <text:line-break/><text:span text:style-name="T1"> </text:span><text:span text:style-name="T2">(37/4) </text:span> ⲟ̣ⲩⲉ̣ⲃ̣ⲟ̣ⲗ̣ [ϩ]ⲛ̣ ⲧϭⲟ[ⲙ ⲛ]ⲧ̣ⲉ ⲡⲏ [ⲉ]ⲧ̣ⲙ‐ <text:line-break/><text:span text:style-name="T1"> </text:span><text:span text:style-name="T2">(37/5) </text:span> ⲙⲁ[ⲩ....]ϣⲟ[ⲟⲡ’ ⲟⲛ]ⲧⲱⲥ ⲉⲥ‐ <text:line-break/><text:span text:style-name="T1"> </text:span><text:span text:style-name="T2">(37/6) </text:span> ϣⲟ̣[.........] ⲛⲧⲁϥ ⲧⲉ· <text:line-break/><text:span text:style-name="T1"> </text:span><text:span text:style-name="T2">(37/7) </text:span> [.]ⲡ[........ ⲉ]ⲩⲣ ϣⲟⲣⲡ’ <text:line-break/><text:span text:style-name="T1"> </text:span><text:span text:style-name="T2">(37/8) </text:span> ⲛ̣ ⲟ̣[........]..ⲉ ⲛⲧⲉ ⲡⲏ ⲉ‐ <text:line-break/><text:span text:style-name="T1"> </text:span><text:span text:style-name="T2">(37/9) </text:span> [ⲧ]ⲙ̣[ⲙⲁⲩ....]ϥ· ⲛⲧⲟϥ ⲇⲉ ⲡⲓⲁⲧ’ <text:line-break/><text:span text:style-name="T1"> </text:span><text:span text:style-name="T2">(37/10) </text:span> [ ]ⲗ· ⲛⲧⲟϥ ⲙⲁⲩⲁⲁϥ <text:line-break/><text:span text:style-name="T1"> </text:span><text:span text:style-name="T2">(37/11) </text:span> [ ].ϯ ⲛⲁϥ ⲙ ⲡⲣⲱⲙⲉ <text:line-break/><text:span text:style-name="T1"> </text:span><text:span text:style-name="T2">(37/12) </text:span> [ ]. ⲁⲧ’ϣⲱ̣[..] ⲛⲁϥ <text:line-break/><text:span text:style-name="T1"> </text:span><text:span text:style-name="T2">(37/13) </text:span> [ ]ϥ ⲧⲏⲣⲟⲩ̣[·] ⲉϥϯ <text:line-break/><text:span text:style-name="T1"> </text:span><text:span text:style-name="T2">(37/14) </text:span> [ ]ⲩ ⲉⲃⲟⲗ ϩⲓⲧⲛ ⲛⲉ <text:line-break/><text:span text:style-name="T1"> </text:span><text:span text:style-name="T2">(37/15) </text:span> [ ]ⲉ ⲡⲁⲓ ⲅⲁⲣ ϩⲉⲛⲙⲉ <text:line-break/><text:span text:style-name="T1"> </text:span><text:span text:style-name="T2">(37/16) </text:span> [ ]ⲥ ϩⲓⲛⲁ ϫⲉ ⲉϥⲉϣⲱ‐ <text:line-break/><text:span text:style-name="T1"> </text:span><text:span text:style-name="T2">(37/17) </text:span> [ ].· ⲁ̣ⲩⲱ ⲡ[ⲉ]ⲧ̣ⲉ <text:line-break/><text:span text:style-name="T1"> </text:span><text:span text:style-name="T2">(37/18) </text:span> [ ]ⲧⲉ ⲙⲙⲟϥ̣ ⲛ <text:line-break/><text:soft-page-break/><text:span text:style-name="T1"> </text:span><text:span text:style-name="T2">(37/19) </text:span> [ ]ⲁ̣ⲧ’ⲡⲱⲣϫ ⲉⲣⲟϥ· <text:line-break/><text:span text:style-name="T1"> </text:span><text:span text:style-name="T2">(37/20) </text:span> [ ⲃ̅ⲁ̅]̅ⲣ̅ⲃ̅ⲏ̅ⲗ̅ⲱ̅· ⲁϥⲧⲟ‐ <text:line-break/><text:span text:style-name="T1"> </text:span><text:span text:style-name="T2">(37/21) </text:span> [ ϩⲓ]ⲛ̣ⲁ ϫⲉ ⲉϥⲉϣⲱ‐ <text:line-break/><text:span text:style-name="T1"> </text:span><text:span text:style-name="T2">(37/22) </text:span> [ ]ⲙⲛⲧ’ⲙⲁⲕⲁ <text:line-break/><text:span text:style-name="T1"> </text:span><text:span text:style-name="T2">(37/23) </text:span> [ⲣⲓⲟⲥ ]ⲥⲓⲥ ⲛ ⲟⲩ‐ <text:line-break/><text:span text:style-name="T1"> </text:span><text:span text:style-name="T2">(37/24) </text:span> [ ] ⲧⲏⲣⲏⲩ· <text:line-break/><text:span text:style-name="T1"> </text:span><text:span text:style-name="T2">(37/25) </text:span> [ ].ϥⲉⲓ <text:line-break/><text:span text:style-name="T1"> </text:span><text:span text:style-name="T2">(37/26) </text:span> [ ].ⲁ <text:line-break/><text:span text:style-name="T1"> </text:span><text:span text:style-name="T2">(37/27) </text:span> [ ]ⲁ̣ <text:line-break/><text:span text:style-name="T1"> </text:span><text:span text:style-name="T2">(37/28) </text:span> [ ]ⲣ <text:line-break/><text:span text:style-name="T1"> </text:span><text:span text:style-name="T2">(37/29) </text:span> [ ]ⲗ̣ⲓⲟ̣[ <text:line-break/><text:span text:style-name="T1"> </text:span><text:span text:style-name="T2">(38/1) </text:span> ⲟⲩ[.......] ⲛⲧⲉ ⲡⲓⲧⲉⲗⲓⲟ[ⲥ] ⲛ̣ <text:line-break/><text:span text:style-name="T1"> </text:span><text:span text:style-name="T2">(38/2) </text:span> ⲛⲟ[ⲩⲥ ......]ⲥⲧ̣ⲡ̣ ⲁⲩⲱ̣ ⲉϥ[.. <text:line-break/><text:span text:style-name="T1"> </text:span><text:span text:style-name="T2">(38/3) </text:span> ⲛ̣ [.........] ⲛ̣ ⲧ̣ⲉⲗⲓⲟⲥ ⲙ ⲡ̅ⲛ̣̅̅[̅ⲁ̅] <text:line-break/><text:span text:style-name="T1"> </text:span><text:span text:style-name="T2">(38/4) </text:span> ⲉ̣[.......ⲧ]ⲉⲗⲓ̣ⲟ̣ⲥ̣ ⲉϥⲟ̣ⲛ̣ϩ ⲛ <text:line-break/><text:span text:style-name="T1"> </text:span><text:span text:style-name="T2">(38/5) </text:span> ϣⲁ ⲉⲛⲉ[ϩ...]ⲩⲧ[.....].ⲛ[. <text:line-break/><text:span text:style-name="T1"> </text:span><text:span text:style-name="T2">(38/6) </text:span> ⲉⲣⲟϥ· ⲁⲩⲱ̣[..]ⲟⲟ̣[...ⲡ]ⲁ̣ⲓ̈ ⲉϥ‐ <text:line-break/><text:span text:style-name="T1"> </text:span><text:span text:style-name="T2">(38/7) </text:span> ϣⲟⲟⲡ’̣[...]ⲡⲉ ⲛ‐ <text:line-break/><text:span text:style-name="T1"> </text:span><text:span text:style-name="T2">(38/8) </text:span> ⲧⲉ ⲡⲓⲧ[...ϣ]ⲁϫⲉ <text:line-break/><text:span text:style-name="T1"> </text:span><text:span text:style-name="T2">(38/9) </text:span> ⲡⲉ ⲉⲃⲟⲗ ϩⲛ [.........].[. <text:line-break/><text:span text:style-name="T1"> </text:span><text:span text:style-name="T2">(38/10) </text:span> ⲉⲧ’ϣⲟⲟⲡ’ ϩⲙ̣ [ <text:line-break/><text:span text:style-name="T1"> </text:span><text:span text:style-name="T2">(38/11) </text:span> ⲛⲧⲁⲩ ⲛ ⲛⲁⲓ̈ ⲧⲏ̣[ⲣⲟⲩ <text:line-break/><text:span text:style-name="T1"> </text:span><text:span text:style-name="T2">(38/12) </text:span> ϣⲁ ⲉⲛⲉϩ· ⲉ.[ <text:line-break/><text:span text:style-name="T1"> </text:span><text:span text:style-name="T2">(38/13) </text:span> ⲟⲡ [ϩ]ⲙ ⲡⲓϣⲙ[ⲧ’ϭⲟⲙ... <text:line-break/><text:span text:style-name="T1"> </text:span><text:span text:style-name="T2">(38/14) </text:span> ϣ[ⲟⲟ]ⲡ’ ϩⲙ ⲡⲓ[... <text:line-break/><text:span text:style-name="T1"> </text:span><text:span text:style-name="T2">(38/15) </text:span> ⲛⲉ ⲛ ⲛⲏ ⲉⲧ’ϣⲟ̣[ⲟⲡ’... <text:line-break/><text:span text:style-name="T1"> </text:span><text:span text:style-name="T2">(38/16) </text:span> ⲛ ⲧⲉⲗⲓⲟⲥ· ⲛ ⲧ[... <text:line-break/><text:span text:style-name="T1"> </text:span><text:span text:style-name="T2">(38/17) </text:span> ⲡⲓⲡⲣⲱⲧⲟⲫⲁ̣[ⲛⲏⲥ... <text:line-break/><text:span text:style-name="T1"> </text:span><text:span text:style-name="T2">(38/18) </text:span> ⲛⲟⲩⲥ· ⲁⲗⲗⲁ .[... <text:line-break/><text:span text:style-name="T1"> </text:span><text:span text:style-name="T2">(38/19) </text:span> ⲧⲟ̣ⲩⲃⲏⲟ[ⲩⲧ’... <text:line-break/><text:span text:style-name="T1"> </text:span><text:span text:style-name="T2">(38/20) </text:span> ⲁⲩⲱ ⲡⲏ ⲙ[... <text:line-break/><text:span text:style-name="T1"> </text:span><text:span text:style-name="T2">(38/21) </text:span> ⲛⲧⲉ ⲟⲩⲉⲓⲛⲉ̣ [... <text:line-break/><text:span text:style-name="T1"> </text:span><text:span text:style-name="T2">(38/22) </text:span> ⲟⲩⲱⲛϩ ⲉⲃⲟ̣[ⲗ... <text:line-break/><text:span text:style-name="T1"> </text:span><text:span text:style-name="T2">(38/23) </text:span> ⲁⲩⲱ ⲡⲓⲁ[ⲧ’... <text:line-break/><text:span text:style-name="T1"> </text:span><text:span text:style-name="T2">(38/24) </text:span> ⲡⲉ ⲛ ⲧ[... <text:line-break/><text:span text:style-name="T1"> </text:span><text:span text:style-name="T2">(38/25) </text:span> ⲙⲙⲟϥ [... <text:line-break/><text:span text:style-name="T1"> </text:span><text:span text:style-name="T2">(38/26) </text:span> ⲛ ⲧ.[... <text:line-break/><text:span text:style-name="T1"> </text:span><text:span text:style-name="T2">(38/27) </text:span> ⲡ[... <text:line-break/><text:span text:style-name="T1"> </text:span><text:span text:style-name="T2">(38/28) </text:span> ⲙ[... <text:line-break/><text:span text:style-name="T1"> </text:span><text:span text:style-name="T2">(38/29) </text:span> ϩ.[... <text:line-break/><text:span text:style-name="T1"> </text:span><text:span text:style-name="T2">(38/30) </text:span> .[... <text:line-break/><text:span text:style-name="T1"> </text:span><text:span text:style-name="T2">(39/1) </text:span> [ ].ⲥ· <text:line-break/><text:span text:style-name="T1"> </text:span><text:span text:style-name="T2">(39/2) </text:span> [.]ⲙ̣ⲉϥ..[ ] ⲛ̅ϭⲓ <text:line-break/><text:span text:style-name="T1"> </text:span><text:span text:style-name="T2">(39/3) </text:span> [..]ⲟⲩ[ ].ϥⲉ <text:line-break/><text:span text:style-name="T1"> </text:span><text:span text:style-name="T2">(39/4) </text:span> [ ]ⲡ’̣ <text:line-break/><text:span text:style-name="T1"> </text:span><text:span text:style-name="T2">(39/5) </text:span> [ ⲉ]ⲧⲃⲏⲏⲧϥ ⲉⲩ‐ <text:line-break/><text:span text:style-name="T1"> </text:span><text:span text:style-name="T2">(39/6) </text:span> [ ]..ϯ ϣⲱⲗϩ ⲉⲣⲟϥ· <text:line-break/><text:soft-page-break/><text:span text:style-name="T1"> </text:span><text:span text:style-name="T2">(39/7) </text:span> [ ϩⲁ]ⲡⲗ̣ⲟⲩⲥ ⲡⲉ <text:line-break/><text:span text:style-name="T1"> </text:span><text:span text:style-name="T2">(39/8) </text:span> [ ⲅ]ⲁⲣ ⲡⲉ ⲛ <text:line-break/><text:span text:style-name="T1"> </text:span><text:span text:style-name="T2">(39/9) </text:span> [ ]ⲙ.ϥ ϩⲱⲥ ⲉϥϣⲟ‐ <text:line-break/><text:span text:style-name="T1"> </text:span><text:span text:style-name="T2">(39/10) </text:span> [ⲟⲡ’ ]ⲱ ϩⲱⲥ ⲉⲕⲉⲟⲩⲁ <text:line-break/><text:span text:style-name="T1"> </text:span><text:span text:style-name="T2">(39/11) </text:span> [ ].ⲟ[.]ⲉⲧⲉ ⲡⲁⲓ̈ ⲡⲉ <text:line-break/><text:span text:style-name="T1"> </text:span><text:span text:style-name="T2">(39/12) </text:span> [ ]ϣⲱⲱⲧ’· ⲉⲧⲃⲉ <text:line-break/><text:span text:style-name="T1"> </text:span><text:span text:style-name="T2">(39/13) </text:span> [ ]ϣⲙⲧ’ϩⲟ[ⲟⲩⲧ] ⲛ̣ <text:line-break/><text:span text:style-name="T1"> </text:span><text:span text:style-name="T2">(39/14) </text:span> [ ϣⲟⲟ]ⲡ’̣ ⲟⲛⲧⲱ[ⲥ] ⲛⲧⲉ <text:line-break/><text:span text:style-name="T1"> </text:span><text:span text:style-name="T2">(39/15) </text:span> [ ⲛⲟ]ⲩⲥ ⲛⲧⲉ ϯⲅⲛⲱ‐ <text:line-break/><text:span text:style-name="T1"> </text:span><text:span text:style-name="T2">(39/16) </text:span> [ⲥⲓⲥ ]ⲉ ⲛⲏ ⲉⲧ’ϣⲟⲟⲡ’ <text:line-break/><text:span text:style-name="T1"> </text:span><text:span text:style-name="T2">(39/17) </text:span> [ ]ⲧⲉ ⲉⲧⲉ ⲟⲩⲛⲧⲁϥ <text:line-break/><text:span text:style-name="T1"> </text:span><text:span text:style-name="T2">(39/18) </text:span> [ ]ϣ̣ⲟⲟⲡ’ ⲟⲛⲧⲱⲥ· <text:line-break/><text:span text:style-name="T1"> </text:span><text:span text:style-name="T2">(39/19) </text:span> [ ]. ⲁⲩ̣ⲱ ⲟⲩ.[.]ⲱ <text:line-break/><text:span text:style-name="T1"> </text:span><text:span text:style-name="T2">(39/20) </text:span> [ ⲉ]ⲃⲟⲗ· ⲁⲩⲱ ⲁ̣ⲥ‐ <text:line-break/><text:span text:style-name="T1"> </text:span><text:span text:style-name="T2">(39/21) </text:span> [ ]ⲩ ⲙ ⲙⲉϩⲥⲛⲁⲩ <text:line-break/><text:span text:style-name="T1"> </text:span><text:span text:style-name="T2">(39/22) </text:span> [ ⲧ]ⲉⲗⲓⲟⲥ· ⲉⲧⲉ <text:line-break/><text:span text:style-name="T1"> </text:span><text:span text:style-name="T2">(39/23) </text:span> [ ⲟ]ⲩⲱⲛϩ ⲉⲃⲟⲗ <text:line-break/><text:span text:style-name="T1"> </text:span><text:span text:style-name="T2">(39/24) </text:span> [ ]ϩ̣ⲏⲧϥ ⲉⲩ‐ <text:line-break/><text:span text:style-name="T1"> </text:span><text:span text:style-name="T2">(39/25) </text:span> [ ]ⲡ̣ⲓⲕ̅ⲗ̅ⲥ̅· <text:line-break/><text:span text:style-name="T1"> </text:span><text:span text:style-name="T2">(39/26) </text:span> [ ] ⲛ ⲁⲧ’‐ <text:line-break/><text:span text:style-name="T1"> </text:span><text:span text:style-name="T2">(39/27) </text:span> [ ] ⲛ ⲟⲩ‐ <text:line-break/><text:span text:style-name="T1"> </text:span><text:span text:style-name="T2">(39/28) </text:span> [ ] ⲛ ⲁⲧ’ <text:line-break/><text:span text:style-name="T1"> </text:span><text:span text:style-name="T2">(39/29) </text:span> [ ⲉⲓ]ⲇⲟⲥ <text:line-break/><text:span text:style-name="T1"> </text:span><text:span text:style-name="T2">(39/30) </text:span> [ ]ⲉ <text:line-break/><text:span text:style-name="T1"> </text:span><text:span text:style-name="T2">(39/31) </text:span> [ ] ⲛ ⲛⲁⲓ̈ <text:line-break/><text:span text:style-name="T1"> </text:span><text:span text:style-name="T2">(40/1) </text:span> ⲗⲟ[ ]ⲁ̣ϩⲡ̣[...] <text:line-break/><text:span text:style-name="T1"> </text:span><text:span text:style-name="T2">(40/2) </text:span> ⲡ[ ]ⲣⲟ̣ⲩ[ <text:line-break/><text:span text:style-name="T1"> </text:span><text:span text:style-name="T2">(40/3) </text:span> ⲧ[ ]ⲩ.[ <text:line-break/><text:span text:style-name="T1"> </text:span><text:span text:style-name="T2">(40/4) </text:span> ⲟ[ <text:line-break/><text:span text:style-name="T1"> </text:span><text:span text:style-name="T2">(40/5) </text:span> ⲉⲓⲇⲟⲥ ⲃ̅ [... <text:line-break/><text:span text:style-name="T1"> </text:span><text:span text:style-name="T2">(40/6) </text:span> §ⲉⲩⲅⲛⲱⲥ̣[ⲓⲥ ⲡⲓⲡⲣⲱ]‐ <text:line-break/><text:span text:style-name="T1"> </text:span><text:span text:style-name="T2">(40/7) </text:span> ⲧⲟⲫⲁ[ⲛⲏⲥ ϩⲟ]‐ <text:line-break/><text:span text:style-name="T1"> </text:span><text:span text:style-name="T2">(40/8) </text:span> ⲟⲩⲧ’ ⲛ [ ‐ⲩⲛ+] <text:line-break/><text:span text:style-name="T1"> </text:span><text:span text:style-name="T2">(40/9) </text:span> ⲧⲁϥ ⲙⲙⲁⲩ ⲛ̣ [ ϩⲩⲡⲁⲣ]‐ <text:line-break/><text:span text:style-name="T1"> </text:span><text:span text:style-name="T2">(40/10) </text:span> ⲝⲓⲥ ⲛϩⲣⲁⲓ̈ [ <text:line-break/><text:span text:style-name="T1"> </text:span><text:span text:style-name="T2">(40/11) </text:span> ⲁⲧ’ⲙⲓⲥⲉ· ⲉⲩ̣[ <text:line-break/><text:span text:style-name="T1"> </text:span><text:span text:style-name="T2">(40/12) </text:span> ⲙⲉϩϣⲟⲙⲧ’ ⲛ̣ [ <text:line-break/><text:span text:style-name="T1"> </text:span><text:span text:style-name="T2">(40/13) </text:span> [...]. ⲉⲩⲛⲧ[ⲁϥ ⲙⲙⲁⲩ <text:line-break/><text:span text:style-name="T1"> </text:span><text:span text:style-name="T2">(40/14) </text:span> ⲉⲓⲙⲉ· ⲁⲩⲱ ⲉ.[ <text:line-break/><text:span text:style-name="T1"> </text:span><text:span text:style-name="T2">(40/15) </text:span> ϣⲟⲟⲡ’ ϩⲓ ⲟⲩⲙ[ⲁ <text:line-break/><text:span text:style-name="T1"> </text:span><text:span text:style-name="T2">(40/16) </text:span> ⲡⲉ ⲙ ⲡⲁⲛⲧⲉⲗ̣[ⲓⲁ...ⲙⲁⲕⲁ]‐ <text:line-break/><text:span text:style-name="T1"> </text:span><text:span text:style-name="T2">(40/17) </text:span> ⲣⲓⲟ̣ⲥ ⲉⲙⲛ ⲗ[ⲁⲁⲩ <text:line-break/><text:span text:style-name="T1"> </text:span><text:span text:style-name="T2">(40/18) </text:span> ⲙⲙⲁⲩ· ⲁ[ <text:line-break/><text:span text:style-name="T1"> </text:span><text:span text:style-name="T2">(40/19) </text:span> ⲉⲃⲟⲗ· ⲉⲃⲟⲗ̣ [ <text:line-break/><text:span text:style-name="T1"> </text:span><text:span text:style-name="T2">(40/20) </text:span> ⲛⲟⲩⲧⲉ ⲡ.[ <text:line-break/><text:span text:style-name="T1"> </text:span><text:span text:style-name="T2">(40/21) </text:span> ⲧϥ ⲛⲙⲙⲁϥ̣ [ <text:line-break/><text:span text:style-name="T1"> </text:span><text:span text:style-name="T2">(40/22) </text:span> ⲛ ⲟⲩⲱ.[ <text:line-break/><text:soft-page-break/><text:span text:style-name="T1"> </text:span><text:span text:style-name="T2">(40/23) </text:span> ⲛ ⲧⲉⲗ̣[ⲓⲟⲥ <text:line-break/><text:span text:style-name="T1"> </text:span><text:span text:style-name="T2">(40/24) </text:span> ⲛⲧⲉ ⲡ[ <text:line-break/><text:span text:style-name="T1"> </text:span><text:span text:style-name="T2">(40/25) </text:span> ⲕ̅ⲗ̅ⲥ̣̅̅ [ <text:line-break/><text:span text:style-name="T1"> </text:span><text:span text:style-name="T2">(40/26) </text:span> ⲃⲁ[ <text:line-break/><text:span text:style-name="T1"> </text:span><text:span text:style-name="T2">(40/27) </text:span> ⲁ[ <text:line-break/><text:span text:style-name="T1"> </text:span><text:span text:style-name="T2">(40/28) </text:span> ⲱ[ <text:line-break/><text:span text:style-name="T1"> </text:span><text:span text:style-name="T2">(40/29) </text:span> ⲇ[ <text:line-break/><text:span text:style-name="T1"> </text:span><text:span text:style-name="T2">(41/1) </text:span> [.].ⲕⲁ[ ]ⲓⲉⲓⲙⲉ <text:line-break/><text:span text:style-name="T1"> </text:span><text:span text:style-name="T2">(41/2) </text:span> [..]ⲛ̣ⲱ̣[ ] ⲛⲧⲉ <text:line-break/><text:span text:style-name="T1"> </text:span><text:span text:style-name="T2">(41/3) </text:span> [...].[ ⲡⲣ]ⲱⲧⲟ‐ <text:line-break/><text:span text:style-name="T1"> </text:span><text:span text:style-name="T2">(41/4) </text:span> [ⲫⲁⲛⲏⲥ ⲡ]ⲓ̣ⲛ̣ⲟⲩ[ⲥ] ⲛⲧⲉ <text:line-break/><text:span text:style-name="T1"> </text:span><text:span text:style-name="T2">(41/5) </text:span> [ ]ⲁ̣ⲩ ⲛ ⲛⲓϭⲟⲙ <text:line-break/><text:span text:style-name="T1"> </text:span><text:span text:style-name="T2">(41/6) </text:span> [ ] ⲡⲧⲏⲣϥ ⲛϩⲣⲁⲓ̈ <text:line-break/><text:span text:style-name="T1"> </text:span><text:span text:style-name="T2">(41/7) </text:span> [...] ⲁ̣ⲩⲱ ϥϣⲟ‐ <text:line-break/><text:span text:style-name="T1"> </text:span><text:span text:style-name="T2">(41/8) </text:span> [ⲟⲡ’ ] ⲧ̣ⲉ̣ⲓ̣̈ⲅ̣ⲛⲱⲥⲓⲥ ⲛ <text:line-break/><text:span text:style-name="T1"> </text:span><text:span text:style-name="T2">(41/9) </text:span> [...]ⲛⲟⲩⲧⲉ ⲡⲓⲁⲩⲧⲟ‐ <text:line-break/><text:span text:style-name="T1"> </text:span><text:span text:style-name="T2">(41/10) </text:span> [ⲅⲉⲛⲏⲥ· ⲡⲓⲁⲩⲧⲟ]ⲅ̣ⲉⲛⲏⲥ ⲇⲉ ⲛ ⲛⲟⲩ‐ <text:line-break/><text:span text:style-name="T1"> </text:span><text:span text:style-name="T2">(41/11) </text:span> [ⲧⲉ ] ⲛ̣ⲧⲉ ⲡⲓⲁⲗⲟⲩ ⲛⲧⲉ <text:line-break/><text:span text:style-name="T1"> </text:span><text:span text:style-name="T2">(41/12) </text:span> [.......]ϣⲙⲧ’[ϩ]ⲟⲟⲩⲧ’· ⲡⲉ̣ⲓ̣̈ϩ̣ⲟⲟⲩⲧ’ <text:line-break/><text:span text:style-name="T1"> </text:span><text:span text:style-name="T2">(41/13) </text:span> [........]ⲡⲟ[.] ⲡⲉ ⲙⲛ ⲟⲩ[ⲉⲓ]ⲇ̣ⲟ̣ⲥ <text:line-break/><text:span text:style-name="T1"> </text:span><text:span text:style-name="T2">(41/14) </text:span> [..........] ⲛ ⲧⲉⲗⲓⲟⲥ ⲉⲙⲙⲛⲧⲁϥ <text:line-break/><text:span text:style-name="T1"> </text:span><text:span text:style-name="T2">(41/15) </text:span> [....]ⲡ[.....] ⲛ̣ϩ̣ⲣⲁⲓ̈ ϩⲛ ⲟⲩⲅⲛⲱⲥⲓⲥ <text:line-break/><text:span text:style-name="T1"> </text:span><text:span text:style-name="T2">(41/16) </text:span> [ⲛ ⲟⲩ]ⲱⲧ’ ⲙ [ⲡ]ⲣⲏⲧⲉ ⲙ ⲡⲏ ⲉⲧⲙⲙⲁⲩ· <text:line-break/><text:span text:style-name="T1"> </text:span><text:span text:style-name="T2">(41/17) </text:span> [....] ⲟⲩϣ[ⲱ]ⲡ̣ⲉ ⲛⲧⲉ ⲛⲓⲕⲁⲧⲁ ⲟⲩⲁ <text:line-break/><text:span text:style-name="T1"> </text:span><text:span text:style-name="T2">(41/18) </text:span> [ⲙⲛ] ⲟ̣ⲩⲅⲛⲱ[ⲥ]ⲓ̣[ⲥ] ⲛ ⲟⲩⲱⲧ’ ⲛⲧⲉ ⲛⲓ‐ <text:line-break/><text:span text:style-name="T1"> </text:span><text:span text:style-name="T2">(41/19) </text:span> [ⲕ]ⲁ̣ⲧⲁ ⲟ̣ⲩⲁ [.]ⲟ̣[....] ⲕⲁⲧⲁ ⲡⲧⲙⲣϥ <text:line-break/><text:span text:style-name="T1"> </text:span><text:span text:style-name="T2">(41/20) </text:span> [...]ⲱⲕ[......] ⲛ̣ ⲧⲉⲗⲓⲟⲥ· ⲡⲓϩⲟ‐ <text:line-break/><text:span text:style-name="T1"> </text:span><text:span text:style-name="T2">(41/21) </text:span> [ⲟ]ⲩⲧ’ ⲇⲉ̣ [.......] ⲛ̣ ⲛⲟⲩⲥ ⲟⲩ‐ <text:line-break/><text:span text:style-name="T1"> </text:span><text:span text:style-name="T2">(41/22) </text:span> [..]ⲱ..[.....]ⲉ ⲡⲓⲕ̅ⲗ̅ⲥ̅· ⲡⲓⲕ̅ⲗⲥ̅ <text:line-break/><text:span text:style-name="T1"> </text:span><text:span text:style-name="T2">(41/23) </text:span> [ⲇⲉ] ⲛ ⲛ[.......] ⲛ ⲛⲟⲩⲧⲉ· ⲟⲩⲁⲣ‐ <text:line-break/><text:span text:style-name="T1"> </text:span><text:span text:style-name="T2">(41/24) </text:span> [ⲭⲏ ]ⲉⲓϭ. ⲁ̣ⲩⲱ ⲟⲩϭⲟⲙ <text:line-break/><text:span text:style-name="T1"> </text:span><text:span text:style-name="T2">(41/25) </text:span> [ ]ⲥ ⲛⲧ[ⲉ] ⲛⲁⲓ̈ ⲧⲏⲣⲟⲩ· <text:line-break/><text:span text:style-name="T1"> </text:span><text:span text:style-name="T2">(41/26) </text:span> [ ⲟⲛ]ⲧⲱⲥ <text:line-break/><text:span text:style-name="T1"> </text:span><text:span text:style-name="T2">(41/27) </text:span> [ ]ⲉ <text:line-break/><text:span text:style-name="T1"> </text:span><text:span text:style-name="T2">(41/28) </text:span> [ ]ⲙⲉ <text:line-break/><text:span text:style-name="T1"> </text:span><text:span text:style-name="T2">(41/29) </text:span> [ ]ⲓ‐ <text:line-break/><text:span text:style-name="T1"> </text:span><text:span text:style-name="T2">(41/30) </text:span> [ ⲡⲣⲱ]ⲧⲟ‐ <text:line-break/><text:span text:style-name="T1"> </text:span><text:span text:style-name="T2">(41/31) </text:span> [ⲫⲁⲛⲏⲥ ]ⲡ̣ⲣⲱ‐ <text:line-break/><text:span text:style-name="T1"> </text:span><text:span text:style-name="T2">(42/1) </text:span> ⲧⲟ[ⲫⲁⲛⲏⲥ ]ⲩⲉⲣ[.. <text:line-break/><text:span text:style-name="T1"> </text:span><text:span text:style-name="T2">(42/2) </text:span> ⲟⲩ[...]ⲛ̣ⲟⲩⲥ̣ [... <text:line-break/><text:span text:style-name="T1"> </text:span><text:span text:style-name="T2">(42/3) </text:span> ⲙ[...]ⲉⲩ̣[... <text:line-break/><text:span text:style-name="T1"> </text:span><text:span text:style-name="T2">(42/4) </text:span> ϩⲓ̣[ <text:line-break/><text:span text:style-name="T1"> </text:span><text:span text:style-name="T2">(42/5) </text:span> ⲧⲁⲡⲧⲏ[ⲣϥ <text:line-break/><text:span text:style-name="T1"> </text:span><text:span text:style-name="T2">(42/6) </text:span> ⲛⲛ ⲁⲧⲙⲓⲥ̣[ⲉ <text:line-break/><text:span text:style-name="T1"> </text:span><text:span text:style-name="T2">(42/7) </text:span> ⲛ ⲣⲱⲙⲉ ⲛ[ <text:line-break/><text:span text:style-name="T1"> </text:span><text:span text:style-name="T2">(42/8) </text:span> ϫⲉ ⲥⲉⲏ[ <text:line-break/><text:span text:style-name="T1"> </text:span><text:span text:style-name="T2">(42/9) </text:span> ϩⲙ ⲙⲛ ⲡⲏ̣ ⲉ[ⲧ <text:line-break/><text:soft-page-break/><text:span text:style-name="T1"> </text:span><text:span text:style-name="T2">(42/10) </text:span> ⲁⲩⲱ ⲡⲏ ⲉⲧⲣ [ <text:line-break/><text:span text:style-name="T1"> </text:span><text:span text:style-name="T2">(42/11) </text:span> ⲡⲏ ⲉⲧ’ϭⲁⲗⲏ̣ⲟ̣[ⲩⲧ’........ <text:line-break/><text:span text:style-name="T1"> </text:span><text:span text:style-name="T2">(42/12) </text:span> ⲟⲡ’ ϩⲙ ⲡⲓⲉⲥⲑⲏ̣[ⲧ]ⲟ̣ⲛ̣ [ⲛ ⲕⲟⲥⲙⲟⲥ] <text:line-break/><text:span text:style-name="T1"> </text:span><text:span text:style-name="T2">(42/13) </text:span> ⲉϥ[ⲟ]ⲛ̣ϩ ⲙⲛ ⲡⲏ [ⲉ]ⲧ’ⲙⲟⲟ̣[ⲩⲧ’... <text:line-break/><text:span text:style-name="T1"> </text:span><text:span text:style-name="T2">(42/14) </text:span> ..[.]ⲉ ⲧⲏⲣⲟⲩ ⲉⲩ[....... <text:line-break/><text:span text:style-name="T1"> </text:span><text:span text:style-name="T2">(42/15) </text:span> ϣⲁϣⲛⲓ ⲉⲩⲟⲩϫⲁⲓ̣̈ [..]ⲁ.[... <text:line-break/><text:span text:style-name="T1"> </text:span><text:span text:style-name="T2">(42/16) </text:span> ⲡⲏ ⲉⲧ’ⲙⲟⲟⲩⲧ’· ⲛⲁⲓ̣̈ ⲇ̣[ⲉ] ⲧⲏ̣[ⲣⲟⲩ] <text:line-break/><text:span text:style-name="T1"> </text:span><text:span text:style-name="T2">(42/17) </text:span> ⲉⲙⲡⲟⲩⲣ ϩⲁⲉ ⲛ ⲟ[ⲩⲟ]ⲩⲇⲁⲓ̈ [... <text:line-break/><text:span text:style-name="T1"> </text:span><text:span text:style-name="T2">(42/18) </text:span> ϣⲟⲣⲡ’· ⲁⲗⲗⲁ ⲉⲩ[ⲛⲟ]ⲩ̣ϩⲙ ⲛϩ[ⲟⲩ]‐ <text:line-break/><text:span text:style-name="T1"> </text:span><text:span text:style-name="T2">(42/19) </text:span> ⲟ [ⲇ]ⲉ ⲉⲩϣⲟⲟⲡ’ ⲉⲩⲑⲉⲃⲓⲏⲟ [ⲩ ʹ264] <text:line-break/><text:span text:style-name="T1"> </text:span><text:span text:style-name="T2">(42/20) </text:span> ⲁⲩⲱ ⲡⲓⲣⲱ̣[ⲙⲉ ⲛⲧⲉ] ⲛⲉ̣ⲧ’ⲙⲟ̣[ⲟⲩⲧ’] <text:line-break/><text:span text:style-name="T1"> </text:span><text:span text:style-name="T2">(42/21) </text:span> ⲧⲉϥⲯⲩⲭⲏ ⲙ[ⲛ ⲡⲉϥⲛⲟ]ⲩⲥ ⲁⲩ̣[ⲱ] <text:line-break/><text:span text:style-name="T1"> </text:span><text:span text:style-name="T2">(42/22) </text:span> ⲡⲉϥⲥⲱⲙⲁ [ⲥⲉⲙⲟⲟⲩ]ⲧ’ ⲧⲏⲣ[ⲟⲩ] <text:line-break/><text:span text:style-name="T1"> </text:span><text:span text:style-name="T2">(42/23) </text:span> ϩⲉⲛϫⲓ ⲕⲁⲥ ⲛ[......]ⲏ̣ⲟ̣[... <text:line-break/><text:span text:style-name="T1"> </text:span><text:span text:style-name="T2">(42/24) </text:span> ϩⲉⲛⲉⲓⲟⲧ[ⲉ] ⲛⲧⲉ [ ϩⲩ]‐ <text:line-break/><text:span text:style-name="T1"> </text:span><text:span text:style-name="T2">(42/25) </text:span> ⲗⲓⲕⲟⲛ· ϩⲉⲛ.[ <text:line-break/><text:span text:style-name="T1"> </text:span><text:span text:style-name="T2">(42/26) </text:span> ⲡⲓⲕⲱ̣ϩ̣ⲧ̣ ⲟⲩ[ <text:line-break/><text:span text:style-name="T1"> </text:span><text:span text:style-name="T2">(42/27) </text:span> ⲕⲟ[ <text:line-break/><text:span text:style-name="T1"> </text:span><text:span text:style-name="T2">(42/28) </text:span> ⲟ.[ <text:line-break/><text:span text:style-name="T1"> </text:span><text:span text:style-name="T2">(42/29) </text:span> ⲕ.[ <text:line-break/><text:span text:style-name="T1"> </text:span><text:span text:style-name="T2">(42/30) </text:span> ⲉ[ <text:line-break/><text:span text:style-name="T1"> </text:span><text:span text:style-name="T2">(43/1) </text:span> ⲉϥⲟⲩⲟⲧⲃ ⲉⲃⲟⲗ̣· ʹ264 ⲡ[ⲓ]ⲙⲉϩⲥⲛⲁⲩ ⲇⲉ <text:line-break/><text:span text:style-name="T1"> </text:span><text:span text:style-name="T2">(43/2) </text:span> ⲛ ⲣⲱ̣ⲙⲉ ⲡⲉ ϯⲯⲩⲭⲏ ⲛⲛ ⲁⲧⲙⲟⲩ <text:line-break/><text:span text:style-name="T1"> </text:span><text:span text:style-name="T2">(43/3) </text:span> ⲉⲧ’[ϣ]ⲟⲟⲡ’ ϩⲛ ⲛⲏ ⲉⲧ’ⲙⲟⲟⲩⲧ’ <text:line-break/><text:span text:style-name="T1"> </text:span><text:span text:style-name="T2">(43/4) </text:span> ⲉⲥϥ̣[ⲓ ⲛ] ⲟⲩⲣⲟ̣ⲟⲩϣ ⲛⲁⲥ· ⲧⲟⲧⲉ <text:line-break/><text:span text:style-name="T1"> </text:span><text:span text:style-name="T2">(43/5) </text:span> [ⲅⲁ]ⲣ̣ ϣⲁ̣ⲥⲉ̣ⲓ̣[ⲣ]ⲉ ⲛ ⲟⲩϣⲓⲛⲉ ⲛ ⲛⲉ‐ <text:line-break/><text:span text:style-name="T1"> </text:span><text:span text:style-name="T2">(43/6) </text:span> ⲧⲣ ⲛⲁϥⲣⲉ [ⲕⲁⲧⲁ ⲡⲟ]ⲩⲁ ⲡⲟⲩⲁ ⲙ‐ <text:line-break/><text:span text:style-name="T1"> </text:span><text:span text:style-name="T2">(43/7) </text:span> ⲙⲟ̣ⲟ̣ⲩ· ⲁ̣[ⲩⲱ ϣⲁⲥⲣ] ⲉⲥ̣ⲑⲁⲛⲉⲥⲑⲉ <text:line-break/><text:span text:style-name="T1"> </text:span><text:span text:style-name="T2">(43/8) </text:span> ⲉ ⲡ̣[ⲓ]ⲙⲕⲁϩ ⲛ [ⲥⲱ]ⲙⲁⲧⲓⲕⲟⲛ ϣⲁⲩ‐ <text:line-break/><text:span text:style-name="T1"> </text:span><text:span text:style-name="T2">(43/9) </text:span> [.........]ⲩⲱⲥ ⲁⲩⲱ ϣⲁⲥⲣ <text:line-break/><text:span text:style-name="T1"> </text:span><text:span text:style-name="T2">(43/10) </text:span> [.......‐ⲩ]ⲛⲧⲁⲥ ⲙⲙⲁⲩ ⲛ‐ <text:line-break/><text:span text:style-name="T1"> </text:span><text:span text:style-name="T2">(43/11) </text:span> [ⲛ ⲟⲩ]ⲛⲟⲩⲧⲉ ⲛ ϣ̣ⲁ ⲉⲛⲉϩ· ϣⲁⲥⲣ <text:line-break/><text:span text:style-name="T1"> </text:span><text:span text:style-name="T2">(43/12) </text:span> ϣ̣ⲃⲏ̣ⲣ ⲛ ϣⲱⲡ[ⲉ] ⲙⲛ ϩⲉⲛⲇ[ⲉⲙⲱ]ⲛ· <text:line-break/><text:span text:style-name="T1"> </text:span><text:span text:style-name="T2">(43/13) </text:span> [ⲡⲓ]ⲣⲱⲙⲉ ⲇⲉ ⲉⲧ’ϣⲟⲟⲡ’ ϩⲛ ϯ‐ <text:line-break/><text:span text:style-name="T1"> </text:span><text:span text:style-name="T2">(43/14) </text:span> [ⲡ]ⲁⲣⲟⲓⲕⲏ[ⲥ]ⲓ̣ⲥ· ⲉϣⲱⲡⲉ ⲇⲉ ⲉ‐ <text:line-break/><text:span text:style-name="T1"> </text:span><text:span text:style-name="T2">(43/15) </text:span> [ⲟⲩⲛ]ⲧⲁϥ ⲙⲙⲁⲩ ⲛ ⲟⲩϭⲓⲛⲉ ⲛⲧⲉ ϯ‐ <text:line-break/><text:span text:style-name="T1"> </text:span><text:span text:style-name="T2">(43/16) </text:span> [ⲙⲛ]ⲧⲙⲉ ⲛ̣[ϩ]ⲣⲁⲓ̈ ⲛϩⲏⲧϥ ⲉϥⲟⲩⲏ[ⲉ]‐ <text:line-break/><text:span text:style-name="T1"> </text:span><text:span text:style-name="T2">(43/17) </text:span> [ⲟⲩ] ⲁ̣ ⲛⲓϩⲃⲏⲩⲉ ⲛⲧⲉ ϩⲉⲛⲕⲟⲟⲩⲉ <text:line-break/><text:span text:style-name="T1"> </text:span><text:span text:style-name="T2">(43/18) </text:span> ⲉ̣ⲩϣⲟⲟⲡ’ ⲕ[ⲁⲕ]ⲱ̣ⲥ ⲛⲁⲓ̈ ⲉⲩϫ̣[ⲱ]‐ <text:line-break/><text:span text:style-name="T1"> </text:span><text:span text:style-name="T2">(43/19) </text:span> [ⲣ]ⲡ’· ʹ264ʹ264 ⲡⲓⲣⲱ[ⲙⲉ] ⲉⲧⲣ ⲙⲉⲧⲁ‐ <text:line-break/><text:span text:style-name="T1"> </text:span><text:span text:style-name="T2">(43/20) </text:span> [ⲛⲟⲓ] ⲉϣⲱ̣ⲉ ⲉ̣[ϥ]ϣⲁⲛⲕⲱ ⲛⲥⲱϥ <text:line-break/><text:span text:style-name="T1"> </text:span><text:span text:style-name="T2">(43/21) </text:span> [ⲛ] ⲛⲉⲧ’ⲙ[ⲟⲟⲩⲧ’] ⲛϥⲣ ⲉⲡⲓⲑⲩⲙⲓ <text:line-break/><text:span text:style-name="T1"> </text:span><text:span text:style-name="T2">(43/22) </text:span> [ⲛ] ⲛⲏ ⲉⲧ̣[ϣ]ⲟ[ⲟⲡ’]· ⲡⲓⲛⲟⲩⲥ ⲛⲛ ⲁ‐ <text:line-break/><text:span text:style-name="T1"> </text:span><text:span text:style-name="T2">(43/23) </text:span> [ⲧ]ⲙⲟⲩ ⲙⲛ ϯⲯⲩⲭⲏ ⲛⲛ ⲁⲧⲙⲟⲩ <text:line-break/><text:span text:style-name="T1"> </text:span><text:span text:style-name="T2">(43/24) </text:span> [.]ⲛ[..]ⲉ̣ϥϭⲉⲡⲏ ⲉⲧⲃⲏⲏⲧⲟⲩ ⲛ <text:line-break/><text:span text:style-name="T1"> </text:span><text:span text:style-name="T2">(43/25) </text:span> ϣⲟⲣⲡ’ ⲉϥⲉⲓⲣⲉ ⲛ ⲟⲩϣⲓ̣ⲛ̣ⲉ <text:line-break/><text:span text:style-name="T1"> </text:span><text:span text:style-name="T2">(43/26) </text:span> ⲉⲧⲃⲏⲧϥ ⲛⲧⲉ ϯⲡⲣⲁⲝⲓ[ⲥ ⲁ]ⲛ <text:line-break/><text:soft-page-break/><text:span text:style-name="T1"> </text:span><text:span text:style-name="T2">(43/27) </text:span> ⲁⲗ̣ⲗⲁ ⲛⲧⲉ ⲛⲓϩⲃⲏ̣ⲩ ⲉ[ⲃⲟ]ⲗ <text:line-break/><text:span text:style-name="T1"> </text:span><text:span text:style-name="T2">(43/28) </text:span> ⲅⲁⲣ ϩⲙ ⲡⲁⲓ̈ ϣⲁ̣ϥ̣[.]ⲓ̣ ⲛ ⲟ[... <text:line-break/><text:span text:style-name="T1"> </text:span><text:span text:style-name="T2">(43/29) </text:span> ⲉⲛⲛ[........]ⲟ[.....] ⲁ̣ⲩⲱ <text:line-break/><text:span text:style-name="T1"> </text:span><text:span text:style-name="T2">(43/30) </text:span> ]ϣⲁϣⲛ̣[ⲓ ]. <text:line-break/><text:span text:style-name="T1"> </text:span><text:span text:style-name="T2">(44/1) </text:span> [ ].ⲁ.. <text:line-break/><text:span text:style-name="T1"> </text:span><text:span text:style-name="T2">(44/2) </text:span> [......].[.......]ϣⲓⲃⲉ· <text:line-break/><text:span text:style-name="T1"> </text:span><text:span text:style-name="T2">(44/3) </text:span> [....].ⲟⲩ[......]ⲁⲧ’ⲃⲱⲗ <text:line-break/><text:span text:style-name="T1"> </text:span><text:span text:style-name="T2">(44/4) </text:span> [....]ⲗ̣· ⲁ[.......]ⲱⲥ ⲛⲁⲓ̈ <text:line-break/><text:span text:style-name="T1"> </text:span><text:span text:style-name="T2">(44/5) </text:span> [....]ⲩ[.....].ⲩ ⲧⲏⲣⲟⲩ <text:line-break/><text:span text:style-name="T1"> </text:span><text:span text:style-name="T2">(44/6) </text:span> [ ]. ⲛⲉ· ⲛⲧⲟⲟⲩ <text:line-break/><text:span text:style-name="T1"> </text:span><text:span text:style-name="T2">(44/7) </text:span> [ ]ⲧⲟⲟⲧⲟⲩ ⲧⲏ‐ <text:line-break/><text:span text:style-name="T1"> </text:span><text:span text:style-name="T2">(44/8) </text:span> [ ].ⲡ’ ⲛϩⲣⲁⲓ̈ ⲛ <text:line-break/><text:span text:style-name="T1"> </text:span><text:span text:style-name="T2">(44/9) </text:span> [ ]ⲁ̣· ⲉⲩϣⲟ.[ <text:line-break/><text:span text:style-name="T1"> </text:span><text:span text:style-name="T2">(44/10) </text:span> ⲧⲉ ⲉⲧϥϣⲟⲟⲡ’ ⲙ̣[ⲙⲟⲥ ..... <text:line-break/><text:span text:style-name="T1"> </text:span><text:span text:style-name="T2">(44/11) </text:span> ⲁϥϫⲓ ⲙ ⲡⲟⲩⲉⲓ̣ [..... <text:line-break/><text:span text:style-name="T1"> </text:span><text:span text:style-name="T2">(44/12) </text:span> ϩⲙ ⲙⲁ ⲛⲓⲙ ⲉⲁ[ϥ]ϣ[ⲱ]ⲡ̣ⲉ ⲛ̣ [ϩⲁ]‐ <text:line-break/><text:span text:style-name="T1"> </text:span><text:span text:style-name="T2">(44/13) </text:span> ⲡⲗⲟ̣ⲩⲛ ⲁⲩⲱ ⲛ̣ ⲟⲩⲁ ⲧⲟⲧⲉ ⲅⲁ̣ⲣ] <text:line-break/><text:span text:style-name="T1"> </text:span><text:span text:style-name="T2">(44/14) </text:span> ⲁ̣[ϥⲛ]ⲟ̣ⲩϩⲙ ⲛϭⲓ [ⲡ]ⲁ̣ⲓ̈ ⲉⲩⲛ ϣϭ̣[ⲟⲙ] <text:line-break/><text:span text:style-name="T1"> </text:span><text:span text:style-name="T2">(44/15) </text:span> ⲙⲙⲟϥ ⲉ ⲣ ⲭⲱⲣⲓⲛ ⲉⲃⲟⲗ ϩⲓⲧⲛ [ⲛⲁⲓ̈] <text:line-break/><text:span text:style-name="T1"> </text:span><text:span text:style-name="T2">(44/16) </text:span> ⲧⲏⲣⲟⲩ· ϣⲁϥϣⲱⲡⲉ ⲉⲛⲧ[.. <text:line-break/><text:span text:style-name="T1"> </text:span><text:span text:style-name="T2">(44/17) </text:span> ⲛⲁⲓ̈ ⲧⲏⲣⲟⲩ· ⲉϣⲱⲡ’ ⲉϥϣⲁ[ⲛⲟⲩ] <text:line-break/><text:span text:style-name="T1"> </text:span><text:span text:style-name="T2">(44/18) </text:span> ⲱϣ ⲡⲁⲗⲓⲛ ⲟⲛ ⲉ[ⲓ]ⲉ̣ ϥⲡⲱⲣ[ϫ ⲛ]‐ <text:line-break/><text:span text:style-name="T1"> </text:span><text:span text:style-name="T2">(44/19) </text:span> ⲥ[ⲁ]ⲃⲟⲗ ⲛ ⲛⲁⲓ̈ ⲧⲏⲣ̣ⲟⲩ· ⲁⲩⲱ ⲛ[ⲧⲟϥ] <text:line-break/><text:span text:style-name="T1"> </text:span><text:span text:style-name="T2">(44/20) </text:span> ⲛ̣ϥⲣ ⲁⲛⲁⲭⲱⲣⲓ̣[ⲛ ⲉ]ⲣⲟϥ ⲙⲁⲩⲁ[ⲁϥ] <text:line-break/><text:span text:style-name="T1"> </text:span><text:span text:style-name="T2">(44/21) </text:span> ⲡⲁⲓ̈ ⲅⲁⲣ ϣⲁ[ϥϣ]ⲱⲡⲉ [ⲛ] ⲛⲟⲩ[ⲧ]‐ <text:line-break/><text:span text:style-name="T1"> </text:span><text:span text:style-name="T2">(44/22) </text:span> ⲉ ⲁϥⲣ ⲁⲛⲁⲭⲱ̣[ⲣⲓ]ⲛ̣ ⲉ̣ ⲡⲛⲟⲩⲧⲉ <text:line-break/><text:span text:style-name="T1"> </text:span><text:span text:style-name="T2">(44/23) </text:span> ⲡⲁⲓ̈ ⲁⲛⲟⲕ ⲉⲧ[ⲥ]ⲱ̣ⲧⲙ ⲉⲣⲟϥ <text:line-break/><text:span text:style-name="T1"> </text:span><text:span text:style-name="T2">(44/24) </text:span> ⲁⲓ̈ⲉⲓⲛⲉ ⲉϩⲣⲁⲓ̈ ⲛ ⲟ̣ⲩ̣ⲥⲙ[ⲟ]ⲩ ⲙ ⲡ[ⲛⲟⲩ]‐ <text:line-break/><text:span text:style-name="T1"> </text:span><text:span text:style-name="T2">(44/25) </text:span> ⲧⲉ ⲉⲧⲟⲛϩ ⲁⲩⲱ ⲛⲛ ⲁⲧⲙ̣ⲓⲥⲉ [ⲉⲧⲛ]‐ <text:line-break/><text:span text:style-name="T1"> </text:span><text:span text:style-name="T2">(44/26) </text:span> ϩⲣⲁⲓ̈ ϩⲛ ⲟⲩⲙⲛⲧⲙⲉ ⲙⲛ ⲡⲓ̣ⲕ[ⲗ̅ⲥ̅] <text:line-break/><text:span text:style-name="T1"> </text:span><text:span text:style-name="T2">(44/27) </text:span> ⲛⲛ ⲁⲧⲙⲓⲥⲉ ⲙⲛ ⲡⲓⲡⲣⲱⲧⲟⲫⲁ̣[ⲛⲏⲥ] <text:line-break/><text:span text:style-name="T1"> </text:span><text:span text:style-name="T2">(44/28) </text:span> ⲛⲛ [ⲁ]ⲧⲛⲁⲩ ⲉⲣⲟϥ ⲛ ϩⲟⲟⲩⲧ’ ⲛ̣ ⲧ[ⲉ]‐ <text:line-break/><text:span text:style-name="T1"> </text:span><text:span text:style-name="T2">(44/29) </text:span> ⲗⲓⲟⲥ̣ ⲛ̣ ⲛⲟⲩⲥ ⲙⲛ ⲡⲓⲁⲧⲛⲁⲩ ⲉ̣‐ <text:line-break/><text:span text:style-name="T1"> </text:span><text:span text:style-name="T2">(44/30) </text:span> ⲣⲟϥ ⲛ̣ ⲁ̣ⲗⲟⲩ ⲛ ϣⲙⲧ’ϩⲟ̣[ⲟ]ⲩⲧ’ <text:line-break/><text:span text:style-name="T1"> </text:span><text:span text:style-name="T2">(44/31) </text:span> ⲙ[ⲛ ⲡⲓⲁ]ⲩⲧⲟⲅ̣[ⲉⲛⲏ]ⲥ ⲛ [ⲛⲟ]ⲩⲧⲉ̣ <text:line-break/><text:span text:style-name="T1"> </text:span><text:span text:style-name="T2">(45/1) </text:span> §ⲁⲩⲱ ⲡⲉϫⲁⲓ̈ ⲙ ⲡⲁⲗⲟⲩ ⲛⲧⲉ ⲡⲁⲗⲟⲩ <text:line-break/><text:span text:style-name="T1"> </text:span><text:span text:style-name="T2">(45/2) </text:span> ⲉⲧ’ⲕⲏ ⲛⲙⲙⲁⲓ̈ ⲏ̅ⲫ̅ⲏ̅ⲥ̅ⲏ̅ⲭ̅ ϫⲉⲩ‐ <text:line-break/><text:span text:style-name="T1"> </text:span><text:span text:style-name="T2">(45/3) </text:span> ⲛ ϭⲟⲙ ⲛ ⲧⲉⲕⲥⲟⲫⲓⲁ ⲉ ⲧⲁⲙⲟⲉⲓ ⲉ <text:line-break/><text:span text:style-name="T1"> </text:span><text:span text:style-name="T2">(45/4) </text:span> ⲡⲓϫⲱⲱⲣⲉ ⲉⲃⲟⲗ ⲛⲧⲉ ⲡⲣⲱⲙⲉ <text:line-break/><text:span text:style-name="T1"> </text:span><text:span text:style-name="T2">(45/5) </text:span> [ⲉ]ⲧ̣ⲟⲩ̣ⲛⲟ[ⲩ]ϩⲙ ⲙⲙⲟϥ· ⲁⲩⲱ ϫⲉ <text:line-break/><text:span text:style-name="T1"> </text:span><text:span text:style-name="T2">(45/6) </text:span> ⲛ̣[ⲓ]ⲙ ⲛ[ⲉ] ⲛ̣ⲏ [ⲉ]ⲧ’[ⲧ]ⲉϩ ⲉⲣⲟϥ· ⲁⲩⲱ <text:line-break/><text:span text:style-name="T1"> </text:span><text:span text:style-name="T2">(45/7) </text:span> ϫⲉ ⲛⲓⲙ ⲛⲉ̣ [ⲛⲏ ⲉ]ⲧ̣ⲡⲱϣ ⲙⲙⲟϥ <text:line-break/><text:span text:style-name="T1"> </text:span><text:span text:style-name="T2">(45/8) </text:span> ϫ[ⲉ]ⲕⲁⲁⲥ ⲉ̣[ⲩⲛ]ⲁⲉⲓⲙⲉ ⲛϭⲓ ⲛⲓⲥⲱ‐ <text:line-break/><text:span text:style-name="T1"> </text:span><text:span text:style-name="T2">(45/9) </text:span> ⲧ[ⲡ’] ⲉⲧⲟ̣ⲛ̣ϩ̣ [ⲁ]ⲩⲱ ⲧⲟⲧⲉ ⲁϥϫⲟⲟⲥ <text:line-break/><text:span text:style-name="T1"> </text:span><text:span text:style-name="T2">(45/10) </text:span> ⲛⲁ[ⲓ̈.....] ϩ̣ⲛ ⲟⲩ〈ⲟⲩ〉ⲱⲛϩ ⲉⲃⲟⲗ <text:line-break/><text:span text:style-name="T1"> </text:span><text:span text:style-name="T2">(45/11) </text:span> ⲛϭⲓ ⲡⲁⲗⲟ̣ⲩ ⲛⲧⲉ ⲡⲁⲗⲟⲩ ⲏ̣̅̅ⲫ̅ⲏ̅ⲥ̅ⲏ̅ⲕ̅ <text:line-break/><text:span text:style-name="T1"> </text:span><text:span text:style-name="T2">(45/12) </text:span> ϫⲉ ⲉϣⲱⲡⲉ ⲉϥϩϣⲁⲛⲣ ⲁ̣[ⲛⲁⲭ]ⲱ‐ <text:line-break/><text:soft-page-break/><text:span text:style-name="T1"> </text:span><text:span text:style-name="T2">(45/13) </text:span> ⲣ[ⲓ] ⲉⲣⲟϥ ⲙⲁⲩⲁⲁϥ ⲛ ⲟⲩⲙⲏⲏϣⲉ <text:line-break/><text:span text:style-name="T1"> </text:span><text:span text:style-name="T2">(45/14) </text:span> ⲛ̣ ⲥⲟⲡ’ ⲁⲩⲱ ⲛϥϣⲱⲡⲉ ⲙ ⲡⲕⲱ‐ <text:line-break/><text:span text:style-name="T1"> </text:span><text:span text:style-name="T2">(45/15) </text:span> [ⲧ]ⲉ ⲛ ϯⲅⲛⲱⲥⲓⲥ ⲛⲧⲉ ϩⲉⲛⲕⲟⲟⲩⲉ <text:line-break/><text:span text:style-name="T1"> </text:span><text:span text:style-name="T2">(45/16) </text:span> [ϣ]ⲁϥⲉⲓⲙⲉ ⲛϭⲓ ⲡⲓⲛⲟⲩⲥ ⲙⲛ ϯ‐ <text:line-break/><text:span text:style-name="T1"> </text:span><text:span text:style-name="T2">(45/17) </text:span> [ⲁⲣ]ⲭⲏ ⲛⲛ ⲁⲧⲙⲟⲩ· ⲧⲟⲧⲉ ⲟⲩ̣ⲛ‐ <text:line-break/><text:span text:style-name="T1"> </text:span><text:span text:style-name="T2">(45/18) </text:span> [ⲧ]ⲁϥ ⲙⲙⲁⲩ ⲛ ⲟⲩϣⲱⲱⲧ’ ϣ[ⲁ]ϥ̣‐ <text:line-break/><text:span text:style-name="T1"> </text:span><text:span text:style-name="T2">(45/19) </text:span> ⲕ̣ⲱⲧⲉ ⲅⲁⲣ ϩⲱⲱ̣[ϥ] ⲙ̣ⲛⲧⲁϥ ⲁⲩⲱ <text:line-break/><text:span text:style-name="T1"> </text:span><text:span text:style-name="T2">(45/20) </text:span> [ϣ]ⲁ̣ϥⲡⲱⲣϫ ⲛⲥ̣[ⲁ]ⲃⲟⲗ ⲙⲙⲟϥ ⲛϥ‐ <text:line-break/><text:span text:style-name="T1"> </text:span><text:span text:style-name="T2">(45/21) </text:span> [ⲁ]ϩⲉⲣⲁⲧϥ ⲛ ..[...] ⲛϥϣⲱⲡⲉ ⲛ‐ <text:line-break/><text:span text:style-name="T1"> </text:span><text:span text:style-name="T2">(45/22) </text:span> [ϩ]ⲣ̣ⲁⲓ̈ ϩⲛ ⲟⲩ[ϩⲟⲣ]ⲙⲏ ⲛ ϣⲙⲙⲟ· <text:line-break/><text:span text:style-name="T1"> </text:span><text:span text:style-name="T2">(45/23) </text:span> [ⲉ] ⲡⲙⲁ ⲛϥϣⲱⲡⲉ ⲛ ⲟⲩⲁ ϣⲁϥ‐ <text:line-break/><text:span text:style-name="T1"> </text:span><text:span text:style-name="T2">(45/24) </text:span> ⲉ̣ⲓ̣ⲛ̣[ⲉ] ϭ̣ⲉ ⲛ ⲟⲩⲙⲏⲏϣⲉ ⲙ ⲙⲟⲣ‐ <text:line-break/><text:span text:style-name="T1"> </text:span><text:span text:style-name="T2">(45/25) </text:span> [ⲫ]ⲏ̣[·] ⲁⲩⲱ ⲉϥϣⲁⲛⲣⲓⲕⲉ ϣⲁϥ‐ <text:line-break/><text:span text:style-name="T1"> </text:span><text:span text:style-name="T2">(45/26) </text:span> [ϣ]ⲱⲡⲉ ⲉϥϣⲓⲛⲉ ⲛⲥⲁ ⲛⲏ ⲉⲧⲉ <text:line-break/><text:span text:style-name="T1"> </text:span><text:span text:style-name="T2">(45/27) </text:span> [ⲛ]ⲥⲉϣⲟⲟⲡ’ ⲁⲛ· ⲁⲩⲱ ⲉ̣ϥϣⲁⲛ‐ <text:line-break/><text:span text:style-name="T1"> </text:span><text:span text:style-name="T2">(45/28) </text:span> ϩⲉ ⲉϩⲣⲁⲓ̈ ⲉ ⲛⲁⲓ̈ ϩⲛ ⲟⲩⲛⲟ̣ⲏⲙⲁ <text:line-break/><text:span text:style-name="T1"> </text:span><text:span text:style-name="T2">(45/29) </text:span> ⲁⲩⲱ ⲉⲙⲛ ϭ[ⲟ]ⲙ ⲛϥⲉⲓ̣[ʹ264]ⲙⲉ ⲉ‐ <text:line-break/><text:span text:style-name="T1"> </text:span><text:span text:style-name="T2">(45/30) </text:span> ⲣⲟⲟⲩ ⲛ ⲕⲉ[ⲣ]ⲏ̣ⲧⲉ· ⲉ̣[ⲓʹ264 ⲙ]ⲏⲧⲓ <text:line-break/><text:span text:style-name="T1"> </text:span><text:span text:style-name="T2">(46/1) </text:span> ⲛϥϫⲓ ⲙ ⲡⲟⲩⲟⲉⲓⲛ ϣⲁϥϣⲱⲡⲉ ⲛ <text:line-break/><text:span text:style-name="T1"> </text:span><text:span text:style-name="T2">(46/2) </text:span> ⲟⲩⲫⲩⲥⲓⲥ· ⲁⲩⲱ ⲙ ⲡⲉⲓ̈ⲣⲏⲧⲉ <text:line-break/><text:span text:style-name="T1"> </text:span><text:span text:style-name="T2">(46/3) </text:span> ϣⲁϥⲉⲓ ⲉϩⲣⲁⲓ̈ ⲉⲩϫⲡⲟ ⲉⲧⲃⲏⲏⲧϥ <text:line-break/><text:span text:style-name="T1"> </text:span><text:span text:style-name="T2">(46/4) </text:span> ⲁⲩⲱ ϣⲁϥⲣ ⲁⲧ’ϣⲁϫⲉ ⲉⲧ̣ⲃⲉ̣ ⲛ̣[ⲓ]‐ <text:line-break/><text:span text:style-name="T1"> </text:span><text:span text:style-name="T2">(46/5) </text:span> ⲙⲕⲟⲟϩ· ⲙⲛ ϯⲙⲛ[ⲧ]ⲁ̣ⲧⲛ [ⲁ]ⲣ̣ⲏ̣[ϫϥ] <text:line-break/><text:span text:style-name="T1"> </text:span><text:span text:style-name="T2">(46/6) </text:span> ⲛⲧⲉ ϯϩⲩⲗⲏ· ⲉ̣ⲩ̣[ⲛⲧ]ⲁϥ [ⲛ] ⲟⲩϭⲟ̣ⲙ <text:line-break/><text:span text:style-name="T1"> </text:span><text:span text:style-name="T2">(46/7) </text:span> ⲛ ϣⲁ ⲉⲛⲉϩ ⲙ̣[ⲙⲁⲩ ⲛ] ⲁⲧⲙⲟⲩ <text:line-break/><text:span text:style-name="T1"> </text:span><text:span text:style-name="T2">(46/8) </text:span> ϣⲁⲩⲥⲟⲛϩϥ ⲛϩ[ⲣⲁⲓ̈ ϩ]ⲙ ⲡⲓⲉⲓ ⲉ [ⲑⲏ] ⲛ‐ <text:line-break/><text:span text:style-name="T1"> </text:span><text:span text:style-name="T2">(46/9) </text:span> ⲧⲉ ⲡⲥⲱⲙⲁ· ϣⲁ[ⲩⲁⲓ]ⲧϥ ⲉϥⲟⲛ̣[ϩ] <text:line-break/><text:span text:style-name="T1"> </text:span><text:span text:style-name="T2">(46/10) </text:span> ⲁⲩⲱ ϣⲁⲩⲥⲟⲛϩ̣[ϥ ⲛ ⲟⲩⲟⲉⲓ]ϣ <text:line-break/><text:span text:style-name="T1"> </text:span><text:span text:style-name="T2">(46/11) </text:span> ⲛⲓⲙ ⲛϩⲣⲁⲓ̈ ϩⲛ ϩⲉⲛⲥⲛⲁⲩϩ ⲉⲩⲛⲁ‐ <text:line-break/><text:span text:style-name="T1"> </text:span><text:span text:style-name="T2">(46/12) </text:span> ϣⲧ’ ⲉ̣ⲩϭⲱϫⲉ ʹ264ʹ264ʹ264 ⲙ̣ⲙ̣ⲟϥ ⲉⲃⲟⲗ <text:line-break/><text:span text:style-name="T1"> </text:span><text:span text:style-name="T2">(46/13) </text:span> ϩⲓ[ⲧⲛ] ⲛ̣ⲓϥⲉ ⲛⲓⲙ ⲉⲧ’ϩⲟⲟⲩ· ϣⲁⲛ‐ <text:line-break/><text:span text:style-name="T1"> </text:span><text:span text:style-name="T2">(46/14) </text:span> ⲧϥⲁ[ⲓ]ⲧϥ ⲟⲛ ⲁⲩⲱ ⲛϥⲣ ⲁⲣϫⲓ ⲟⲛ̣ <text:line-break/><text:span text:style-name="T1"> </text:span><text:span text:style-name="T2">(46/15) </text:span> ⲉϣⲱⲡⲉ ϩⲣⲁⲓ̈ ⲛϩⲏⲧϥ· ⲉⲧⲃⲉ ⲡ[ⲁⲓ̈] <text:line-break/><text:span text:style-name="T1"> </text:span><text:span text:style-name="T2">(46/16) </text:span> ⲥⲉⲧⲏϣ ⲉϩⲣⲁⲓ̈ ⲉϫⲛ ⲡⲓⲟⲩϫⲁⲓ̈ ⲛ[ⲧⲉ] <text:line-break/><text:span text:style-name="T1"> </text:span><text:span text:style-name="T2">(46/17) </text:span> ⲛⲁⲓ̈· ⲁⲩⲱ ⲛⲁⲓ̈ϭⲟⲙ ⲛⲁⲓ̈ ⲥⲉϣⲟ[ⲟⲡ’] <text:line-break/><text:span text:style-name="T1"> </text:span><text:span text:style-name="T2">(46/18) </text:span> ϩⲙ ⲡⲓⲙⲁ· ⲁⲩⲱ ⲛϩⲣⲁ̣ⲓ̈ ϩⲛ ⲛⲓⲁⲩ̣[ⲧⲟ]‐ <text:line-break/><text:span text:style-name="T1"> </text:span><text:span text:style-name="T2">(46/19) </text:span> ⲅⲉ̣ⲛⲏⲥ ⲕⲁⲧⲁ ⲡⲟⲩ̣ⲁ ⲡⲟⲩⲁ ⲛⲧⲉ ⲛ[ⲓⲉ]‐ <text:line-break/><text:span text:style-name="T1"> </text:span><text:span text:style-name="T2">(46/20) </text:span> ⲱⲛ ⲥⲉⲁϩⲉⲣⲁ[ⲧⲟ]ⲩ̣ ⲛϭⲓ ϩⲉⲛⲉⲟⲟⲩ <text:line-break/><text:span text:style-name="T1"> </text:span><text:span text:style-name="T2">(46/21) </text:span> ϩⲓⲛⲁ ϫⲉ ⲉϥⲉⲛⲟ̣[ⲩ]ϩ̣ⲙ ⲛⲥⲁⲥⲡⲓⲣ ⲛⲁ̣[ⲓ̈] <text:line-break/><text:span text:style-name="T1"> </text:span><text:span text:style-name="T2">(46/22) </text:span> ⲛϭⲓ ⲡⲏ ⲉⲧⲙ ⲡ[ⲓⲙⲁ ⲛ]ⲓ̣ⲉⲟⲟⲩ ⲇⲉ ϩ[ⲉⲛ]‐ <text:line-break/><text:span text:style-name="T1"> </text:span><text:span text:style-name="T2">(46/23) </text:span> ⲛⲟⲏⲙⲁ ⲛⲉ ⲛ ⲧⲉⲗ̣[ⲓ]ⲟ̣ⲥ ⲉⲩⲟⲛϩ ⲉ ⲛ̣[ⲓ]‐ <text:line-break/><text:span text:style-name="T1"> </text:span><text:span text:style-name="T2">(46/24) </text:span> ϭⲟⲙ ⲛⲥⲉⲧⲁⲕⲟ 〈ⲁⲛ〉 ϫⲉ ϩⲉⲛⲧⲩⲡⲟⲥ̣ [ⲛⲉ] <text:line-break/><text:span text:style-name="T1"> </text:span><text:span text:style-name="T2">(46/25) </text:span> ⲛⲧⲉ ⲟⲩⲟⲩϫⲁⲓ̈· ⲉⲧⲉ ⲉϣⲁ̣ⲣ̣[ⲉ]ⲡ̣[ⲟⲩⲁ] <text:line-break/><text:span text:style-name="T1"> </text:span><text:span text:style-name="T2">(46/26) </text:span> ⲡⲟⲩⲁ ϫⲓⲧⲟⲩ ⲉϥⲉⲛⲟⲩϩⲙ ⲉϩⲣ[ⲁⲓ̈ ⲉ]‐ <text:line-break/><text:span text:style-name="T1"> </text:span><text:span text:style-name="T2">(46/27) </text:span> ⲣⲟⲟⲩ· ⲁⲩⲱ ⲉϥϫⲓ ⲧⲩⲡⲟⲥ· ⲉϥ‐ <text:line-break/><text:span text:style-name="T1"> </text:span><text:span text:style-name="T2">(46/28) </text:span> ϫⲓ ϭⲟⲙ ⲉⲃⲟⲗ ϩⲓⲧⲛ ⲡⲁⲓ̈ ⲡⲁⲓ̈· ⲁⲩ[ⲱ] <text:line-break/><text:span text:style-name="T1"> </text:span><text:span text:style-name="T2">(46/29) </text:span> ⲉⲩⲛⲧⲁ̣ϥ ⲙ ⲡⲓⲉⲟⲟⲩ ⲛ ⲟⲩⲃⲟⲏⲑⲟ[ⲥ] <text:line-break/><text:soft-page-break/><text:span text:style-name="T1"> </text:span><text:span text:style-name="T2">(46/30) </text:span> ⲙ ⲡⲓⲣ̣[ⲏ]ⲧⲉ ϣⲁϥⲥ̣[ⲓ]ⲛⲉ ⲙ ⲡⲓⲕⲟⲥⲙⲟ[ⲥ] <text:line-break/><text:span text:style-name="T1"> </text:span><text:span text:style-name="T2">(46/31) </text:span> ⲁⲩ[ⲱ ⲛⲓⲉ]ⲱⲛ [...]ⲙ· ⲁⲩⲱ ⲥⲉϣⲟ‐ <text:line-break/><text:span text:style-name="T1"> </text:span><text:span text:style-name="T2">(47/1) </text:span> ⲟⲡ’ ⲛϭⲓ ⲛⲓⲣⲉϥⲁⲣⲉϩ ⲛⲧⲉ ϯⲯⲩⲭⲏ <text:line-break/><text:span text:style-name="T1"> </text:span><text:span text:style-name="T2">(47/2) </text:span> ⲛⲛ ⲁⲧⲙⲟⲩ ⲅⲁ̅ⲙ̅ⲁ̅ⲗ̅ⲓ̅ⲏ̅ⲗ̅ ⲙⲛ <text:line-break/><text:span text:style-name="T1"> </text:span><text:span text:style-name="T2">(47/3) </text:span> ⲥ̅ⲧ̅ⲣ̅ⲉ̅ⲙ̅ⲯ̅ⲟ̅ⲩ̅ⲭ̅ⲟ̅ⲥ̅· ⲁⲩⲱ ⲁ̅ⲕⲣⲁⲙⲁⲥ̅ <text:line-break/><text:span text:style-name="T1"> </text:span><text:span text:style-name="T2">(47/4) </text:span> [ⲙ]ⲛ ⲗ̅ⲱ̣̅̅ⲏ̅ⲗ̅· ⲁⲩⲱ ⲙ̅ⲛⲏⲥⲓⲛⲟⲩⲥ̅· <text:line-break/><text:span text:style-name="T1"> </text:span><text:span text:style-name="T2">(47/5) </text:span> [ⲛⲁⲓ̈ ⲛⲓ]ⲡ̣̅̅ⲛ̅ⲁ̅ [ⲛ]ⲉ ⲛⲛ ⲁⲧⲙⲟⲩ· ⲓ̈ⲉ̅ⲥⲥⲉⲩⲥ̅ <text:line-break/><text:span text:style-name="T1"> </text:span><text:span text:style-name="T2">(47/6) </text:span> [ⲙ̅]̅ⲁ̣̅̅ⲍ̅ⲁ̣̅̅ⲣ̅ⲉ̅ⲩ̅[̅ⲥ̅] ⲓ̣̅̈ⲉ[ⲥ]ⲥ̣ⲉⲇⲉⲕⲉⲩⲥ̅· <text:line-break/><text:span text:style-name="T1"> </text:span><text:span text:style-name="T2">(47/7) </text:span> [.].ⲁϯ̣ⲧⲟⲩ [...] ⲛ̣ⲧⲉ ⲡⲓⲁⲗⲟⲩ ⲡⲉ <text:line-break/><text:span text:style-name="T1"> </text:span><text:span text:style-name="T2">(47/8) </text:span> [..]ⲱ̅ⲣ̣̅̅ ⲡⲁⲗ̣[ⲟ]ⲩ̣ ⲛⲧⲉ ⲡⲁⲗⲟⲩ· ⲁⲩⲱ <text:line-break/><text:span text:style-name="T1"> </text:span><text:span text:style-name="T2">(47/9) </text:span> .[..]..[....]ⲟⲕ· ⲟ̅ⲣ̅ⲙ̅ⲟ̅ⲥ̅ ⲇⲉ <text:line-break/><text:span text:style-name="T1"> </text:span><text:span text:style-name="T2">(47/10) </text:span> ⲡⲉ[......]ϣ ⲉϫⲛ ϯⲥⲡⲟⲣⲁ ⲉⲧⲟ‐ <text:line-break/><text:span text:style-name="T1"> </text:span><text:span text:style-name="T2">(47/11) </text:span> ⲛϩ· ⲕⲁⲙ[..]ⲏ̅ⲗ̅ ⲇⲉ ⲡⲉ ⲡⲓⲣⲉ̣ϥ̣ϯ ⲡ̅ⲛ̅ⲁ̅ <text:line-break/><text:span text:style-name="T1"> </text:span><text:span text:style-name="T2">(47/12) </text:span> ⲛⲏ ⲇⲉ ⲥ̣[ⲉ]ⲁϩ̣ⲉⲣⲁⲧⲟⲩ ⲛⲛⲁϩⲣ[ⲁⲩ] ⲥ̣ⲉ‐ <text:line-break/><text:span text:style-name="T1"> </text:span><text:span text:style-name="T2">(47/13) </text:span> ⲓ̈ⲥ̅ⲁ̅ⲩ̅ⲏ̅ⲗ̅ ⲙⲛ ⲁ̅ⲩⲇⲁⲏⲗ̅ ⲁⲩⲱ [ⲁ̅]ⲃⲣⲁⲥⲁⲝ̅ <text:line-break/><text:span text:style-name="T1"> </text:span><text:span text:style-name="T2">(47/14) </text:span> ⲛ̣ⲓ̣ⲁ̣ⲛ̣ⲧⲃⲁ ⲫ̅ⲁ̅ⲗ̅ⲉ̅ⲣ̅ⲓ̅ⲥ̅ ⲛⲙ ⲫ̅ⲁⲗⲥⲏⲥ̅ <text:line-break/><text:span text:style-name="T1"> </text:span><text:span text:style-name="T2">(47/15) </text:span> [ⲁⲩ]ⲱ ⲉ̅ⲩ̅ⲣ̅ⲓ̅ⲟ̅ⲥ̅· ⲛⲓⲣⲉϥⲁⲣⲉϩ ⲛⲧⲉ <text:line-break/><text:span text:style-name="T1"> </text:span><text:span text:style-name="T2">(47/16) </text:span> [ⲡⲓ]ⲉⲟⲟⲩ ⲥ̅ⲧ̅ⲏ̅ⲑ̅ⲉ̅ⲩ̅ⲥ̅ ⲙⲛ ⲑ̅ⲉⲟ̅‐ <text:line-break/><text:span text:style-name="T1"> </text:span><text:span text:style-name="T2">(47/17) </text:span> [ⲡ̅ⲉ̅]̅ⲙ̅ⲡ̅ⲧ̅ⲟ̅ⲥ̅ ⲙⲛ ⲉ̅ⲩⲣⲩⲙⲉⲛⲉⲩ̣ⲥ̅ <text:line-break/><text:span text:style-name="T1"> </text:span><text:span text:style-name="T2">(47/18) </text:span> ⲙ̣ⲛ ⲟ̅ⲗ̅ⲥ̅ⲏ̅ⲛ̅· ⲛⲓⲃⲟⲏⲑⲟⲥ ⲇⲉ ϩ[ⲛ] <text:line-break/><text:span text:style-name="T1"> </text:span><text:span text:style-name="T2">(47/19) </text:span> [ϩ]ⲱⲃ ⲛⲓⲙ ⲡⲉ ⲃ̅ⲁ̅[̅.̅.̅.̅]̅ⲙ̅ⲟ̅ⲥ̅· ⲙⲛ <text:line-break/><text:span text:style-name="T1"> </text:span><text:span text:style-name="T2">(47/20) </text:span> [.]ⲥ̅ⲱ̅ⲛ̅ ⲙⲛ ⲉ̅ⲓⲣ[.]ⲛ· ⲙⲛ ⲗ̅ⲁⲗⲁⲙⲉⲩⲥ̅ <text:line-break/><text:span text:style-name="T1"> </text:span><text:span text:style-name="T2">(47/21) </text:span> ⲙⲛ ⲉ̅ⲓ̅ⲇ̅ⲟ̅ⲙ̅ⲉ̅ⲛ̅ⲉ̅ⲩ̣̅̅ⲥ̅· ⲙⲛ ⲁ̅ⲩⲑⲣⲟⲩ̅‐ <text:line-break/><text:span text:style-name="T1"> </text:span><text:span text:style-name="T2">(47/22) </text:span> [ⲛ̅]̅ⲓ̅ⲟ̅ⲥ̅· ⲛⲓⲣⲉϥϯ ϩⲁⲡ’ ⲡⲉ ⲥ̅ⲩⲙⲫⲑⲁⲣ̅ <text:line-break/><text:span text:style-name="T1"> </text:span><text:span text:style-name="T2">(47/23) </text:span> [ⲁ]ⲩⲱ ⲉ̅ⲩ̅ⲕ̅ⲣ̅ⲉ̅ⲃ̅ⲱ̅ⲥ̅ ⲙⲛ ⲕ̅ⲉⲓⲗⲁⲣ̅· <text:line-break/><text:span text:style-name="T1"> </text:span><text:span text:style-name="T2">(47/24) </text:span> [ⲡ]ⲓ̣[ⲡⲁ]ⲣ̣ⲁ̣ⲗⲏⲙⲡⲧⲱⲣ ⲥ̅ⲁ̅ⲙ̅ⲃ̅ⲗ̅ⲱ̅· ⲛⲓ‐ <text:line-break/><text:span text:style-name="T1"> </text:span><text:span text:style-name="T2">(47/25) </text:span> [ⲁⲅ]ⲅ̣ⲉ̣ⲗⲟⲥ ⲛ ⲣⲉϥϫⲓ ⲙⲟⲉⲓⲧ’ ϩⲏⲧⲟⲩ <text:line-break/><text:span text:style-name="T1"> </text:span><text:span text:style-name="T2">(47/26) </text:span> [ⲛ] ⲛⲓϭⲏⲡⲉ ⲛ ⲕⲗⲟⲟⲗⲉ ⲥ̅ⲁ̅ⲫ̅ⲫ̅ⲱ̅ <text:line-break/><text:span text:style-name="T1"> </text:span><text:span text:style-name="T2">(47/27) </text:span> ⲙⲛ ⲑ̅ⲟ̅ⲩ̅ⲣ̅ⲱ̅· ʹ264ʹ264 ⲛⲁⲓ̈ ⲉⲧⲁϥϫⲟ‐ <text:line-break/><text:span text:style-name="T1"> </text:span><text:span text:style-name="T2">(47/28) </text:span> ⲟ̣ⲩ ⲁϥⲧⲁⲙⲟⲓ̈ ⲉ ⲛⲁⲓ̈ ⲧⲏⲣⲟⲩ ⲉⲧ’‐ <text:line-break/><text:span text:style-name="T1"> </text:span><text:span text:style-name="T2">(47/29) </text:span> ϣⲟⲟⲡ’ ϩⲛ ⲛⲓ̣ⲁ̣ⲩⲧⲟⲅⲉⲛ̣ⲏ̣ⲥ ⲛ‐ <text:line-break/><text:span text:style-name="T1"> </text:span><text:span text:style-name="T2">(47/30) </text:span> ⲛ ⲉⲱⲛ ⲁⲩⲱ̣ ⲛ̣ⲉⲩⲉ ⲛ̣ [ⲟⲩ]ⲟ̣ⲉⲓⲛ <text:line-break/><text:span text:style-name="T1"> </text:span><text:span text:style-name="T2">(48/1) </text:span> ⲧⲏⲣⲟⲩ ⲛ ϣⲁ ⲉⲛⲉϩ· ⲁⲩⲱ ⲛ ⲧⲉⲗⲓⲟⲥ̣ <text:line-break/><text:span text:style-name="T1"> </text:span><text:span text:style-name="T2">(48/2) </text:span> ⲉⲩϫⲏⲕ ⲉⲃⲟⲗ ⲛ ⲕⲁⲧⲁ ⲟⲩⲁ· ⲁⲩⲱ <text:line-break/><text:span text:style-name="T1"> </text:span><text:span text:style-name="T2">(48/3) </text:span> ⲁⲓ̈ⲛⲁⲩ ⲕⲁⲧⲁ ⲡⲟⲩⲁ ⲡ[ⲟ]ⲩⲁ ⲛⲧⲉ <text:line-break/><text:span text:style-name="T1"> </text:span><text:span text:style-name="T2">(48/4) </text:span> ⲛⲓⲉⲱⲛ ⲉⲩⲕⲁϩ ⲉϥⲟ[ⲛ]ϩ̣ ⲙⲛ̣ [ⲟⲩ]‐ <text:line-break/><text:span text:style-name="T1"> </text:span><text:span text:style-name="T2">(48/5) </text:span> ⲙⲟⲟⲩ ⲉϥⲟⲛϩ· ⲙ[ⲛ] ⲟⲩ[ⲁ]ⲏ̣[ⲣ ⲉϥⲉ]‐ <text:line-break/><text:span text:style-name="T1"> </text:span><text:span text:style-name="T2">(48/6) </text:span> ⲛ ⲟⲩⲟⲉⲓⲛ· ⲁⲩⲱ̣ [ⲟ]ⲩⲕ̣ⲱ̣ϩ[ⲧ’ ⲉⲧⲉ]‐ <text:line-break/><text:span text:style-name="T1"> </text:span><text:span text:style-name="T2">(48/7) </text:span> ⲙⲉϥⲣⲱⲕ̣[ϩ ⲛⲁⲓ̈ ⲧ]ⲏ̣ⲣⲟ̣ⲩ ⲉϩ[ⲉⲛ]‐ <text:line-break/><text:span text:style-name="T1"> </text:span><text:span text:style-name="T2">(48/8) </text:span> ϩⲁⲡⲗⲟⲩⲛ ⲛⲉ̣ [ⲁⲩ]ⲱ ⲛⲛ ⲁⲧ[ⲟⲩⲱ]‐ <text:line-break/><text:span text:style-name="T1"> </text:span><text:span text:style-name="T2">(48/9) </text:span> ⲧⲃ ⲉⲃⲟⲗ· ⲙⲛ ϩ[ⲉⲛⲍⲱⲟⲛ ⲛϩ]ⲁ̣ <text:line-break/><text:span text:style-name="T1"> </text:span><text:span text:style-name="T2">(48/10) </text:span> ⲡⲗⲟⲩⲛ ⲁⲩⲱ [ⲛ ϣⲁ ⲉⲛ]ⲉ̣ϩ <text:line-break/><text:span text:style-name="T1"> </text:span><text:span text:style-name="T2">(48/11) </text:span> ⲉⲩⲛⲧⲁⲩ ⲛ ⲟⲩⲥ.[...] ⲛ̣ ⲟⲩⲙⲏ‐ <text:line-break/><text:span text:style-name="T1"> </text:span><text:span text:style-name="T2">(48/12) </text:span> ⲏ̣ϣⲉ ⲛ ⲣⲏⲧⲉ· ⲙⲛ̣ ϩ[ⲉ]ⲛϣⲏⲛ <text:line-break/><text:span text:style-name="T1"> </text:span><text:span text:style-name="T2">(48/13) </text:span> [ⲉ]ⲙⲁⲩⲧⲁⲕⲟ ⲛ ⲟⲩⲙⲏⲏϣⲉ <text:line-break/><text:span text:style-name="T1"> </text:span><text:span text:style-name="T2">(48/14) </text:span> ⲛ ⲣⲏⲧⲉ· ⲙⲛ ϩⲉⲛⲛⲧⲏϭ ⲟ[ⲛ]ⲙ̣ <text:line-break/><text:span text:style-name="T1"> </text:span><text:span text:style-name="T2">(48/15) </text:span> ⲡⲉⲓ̈ⲣⲏⲧⲉ ⲙⲛ ⲛⲁⲓ̈ ⲧⲏⲣⲟⲩ ⲙ[ⲛ] <text:line-break/><text:soft-page-break/><text:span text:style-name="T1"> </text:span><text:span text:style-name="T2">(48/16) </text:span> ⲟⲩⲕⲁⲣⲡⲟⲥ ⲉⲙⲁϥⲧⲁⲕⲟ ⲙ[ⲛ] <text:line-break/><text:span text:style-name="T1"> </text:span><text:span text:style-name="T2">(48/17) </text:span> ϩⲉⲛⲣⲱⲙⲉ ⲉⲩⲟⲛϩ ⲙⲛ ⲉⲓⲇ[ⲟⲥ] <text:line-break/><text:span text:style-name="T1"> </text:span><text:span text:style-name="T2">(48/18) </text:span> ⲛ̣ⲓⲙ· ⲙⲛ ϩⲉⲛⲯⲩⲭⲏ ⲛⲛ ⲁⲧⲙ[ⲟⲩ] <text:line-break/><text:span text:style-name="T1"> </text:span><text:span text:style-name="T2">(48/19) </text:span> ⲁⲩⲱ ⲙⲟⲣ[ⲫ]ⲏ ⲛⲓⲙ ⲙⲛ ⲉⲓⲇⲟ̣[ⲥ] <text:line-break/><text:span text:style-name="T1"> </text:span><text:span text:style-name="T2">(48/20) </text:span> ⲛⲓⲙ ⲛⲧⲉ ⲟⲩ̣ⲛ̣ⲟⲩⲥ· ⲙⲛ ϩⲉⲛ‐ <text:line-break/><text:span text:style-name="T1"> </text:span><text:span text:style-name="T2">(48/21) </text:span> ⲛⲟⲩⲧⲉ ⲛ ⲧⲁⲡⲙⲁⲙⲉ· ⲙⲛ <text:line-break/><text:span text:style-name="T1"> </text:span><text:span text:style-name="T2">(48/22) </text:span> ϩⲉⲛⲁⲅⲅⲉⲗⲟⲥ ⲉⲩϣⲟⲟⲡ’ ϩ[ⲛ] <text:line-break/><text:span text:style-name="T1"> </text:span><text:span text:style-name="T2">(48/23) </text:span> ⲟⲩⲛⲟϭ ⲛⲛ ⲉⲟⲟⲩ· ⲙⲛ ⲟⲩ‐ <text:line-break/><text:span text:style-name="T1"> </text:span><text:span text:style-name="T2">(48/24) </text:span> ⲥⲱⲙⲁ ⲉⲙⲁⲩⲃⲱⲗ ⲉⲃⲟⲗ [ⲙⲛ] <text:line-break/><text:span text:style-name="T1"> </text:span><text:span text:style-name="T2">(48/25) </text:span> ⲟⲩϫⲡⲟ ⲛⲛ ⲁⲧⲙⲓⲥⲉ ⲙⲛ ⲟⲩ‐ <text:line-break/><text:span text:style-name="T1"> </text:span><text:span text:style-name="T2">(48/26) </text:span> ⲉⲥⲑⲏⲥⲓⲥ ⲛⲛ ⲁⲧ’ⲕⲓⲙ· ⲁⲩⲱ̣ <text:line-break/><text:span text:style-name="T1"> </text:span><text:span text:style-name="T2">(48/27) </text:span> ⲛⲉϥⲙⲙⲁⲩ ⲟⲛ ⲡⲉ ⲛϭⲓ ⲡⲏ ⲉ̣ⲧ̣‐ <text:line-break/><text:span text:style-name="T1"> </text:span><text:span text:style-name="T2">(48/28) </text:span> ϫⲓ ⲙⲕⲁϩ ⲉϥⲉ ⲛ̣ ⲁⲧ’ϫⲓ ⲙⲕⲁϩ· <text:line-break/><text:span text:style-name="T1"> </text:span><text:span text:style-name="T2">(48/29) </text:span> §ⲛⲉⲩ̣ϭⲟⲙ ⲅⲁ[ⲣ] ⲡ̣ⲉ ⲛⲧⲉ ⲟⲩϭ̣ⲟ̣ⲙ· <text:line-break/><text:span text:style-name="T1"> </text:span><text:span text:style-name="T2">(49/1) </text:span> [ ].ⲁ.. <text:line-break/><text:span text:style-name="T1"> </text:span><text:span text:style-name="T2">(49/2) </text:span> [......].[.......]ϣⲓⲃⲉ· <text:line-break/><text:span text:style-name="T1"> </text:span><text:span text:style-name="T2">(49/3) </text:span> [....].ⲟⲩ[......]ⲁⲧ’ⲃⲱⲗ <text:line-break/><text:span text:style-name="T1"> </text:span><text:span text:style-name="T2">(49/4) </text:span> [....]ⲗ̣· ⲁ[.......]ⲱⲥ ⲛⲁⲓ̈ <text:line-break/><text:span text:style-name="T1"> </text:span><text:span text:style-name="T2">(49/5) </text:span> [....]ⲩ[.....].ⲩ ⲧⲏⲣⲟⲩ <text:line-break/><text:span text:style-name="T1"> </text:span><text:span text:style-name="T2">(49/6) </text:span> [ ]. ⲛⲉ· ⲛⲧⲟⲟⲩ <text:line-break/><text:span text:style-name="T1"> </text:span><text:span text:style-name="T2">(49/7) </text:span> [ ]ⲧⲟⲟⲧⲟⲩ ⲧⲏ‐ <text:line-break/><text:span text:style-name="T1"> </text:span><text:span text:style-name="T2">(49/8) </text:span> [ ].ⲡ’ ⲛϩⲣⲁⲓ̈ ⲛ <text:line-break/><text:span text:style-name="T1"> </text:span><text:span text:style-name="T2">(49/9) </text:span> [ ]ⲁ̣· ⲉⲩϣⲟ.[ <text:line-break/><text:span text:style-name="T1"> </text:span><text:span text:style-name="T2">(49/10) </text:span> [ ]ϣ̣ⲱⲡⲉ [.].[ <text:line-break/><text:span text:style-name="T1"> </text:span><text:span text:style-name="T2">(49/11) </text:span> [ ]ⲉ ⲛ ⲛⲉ̣[ <text:line-break/><text:span text:style-name="T1"> </text:span><text:span text:style-name="T2">(49/12) </text:span> (Lines 12 and following do not survive) <text:line-break/><text:span text:style-name="T1"> </text:span><text:span text:style-name="T2">(50/1) </text:span> ⲛⲧⲉ[ <text:line-break/><text:span text:style-name="T1"> </text:span><text:span text:style-name="T2">(50/2) </text:span> ⲣⲟⲩ.[....]ⲛ̣ ϩ̣ⲁⲡⲗ̣[ <text:line-break/><text:span text:style-name="T1"> </text:span><text:span text:style-name="T2">(50/3) </text:span> ⲛ ⲧⲉⲗⲓ̣[ⲟⲥ........]ⲉ.[ <text:line-break/><text:span text:style-name="T1"> </text:span><text:span text:style-name="T2">(50/4) </text:span> ⲛ ϣⲁ ⲉⲛ[ⲉϩ .....]ⲟ.[ <text:line-break/><text:span text:style-name="T1"> </text:span><text:span text:style-name="T2">(50/5) </text:span> ⲛ ⲉⲱⲛ ⲛ[ <text:line-break/><text:span text:style-name="T1"> </text:span><text:span text:style-name="T2">(50/6) </text:span> ⲡⲉ ⲁⲩⲱ ⲡ[ <text:line-break/><text:span text:style-name="T1"> </text:span><text:span text:style-name="T2">(50/7) </text:span> ϫⲓ ϭⲟⲙ ⲉⲃ[ⲟⲗ <text:line-break/><text:span text:style-name="T1"> </text:span><text:span text:style-name="T2">(50/8) </text:span> ⲁ̣ⲩⲱ ⲛⲉⲩ[ <text:line-break/><text:span text:style-name="T1"> </text:span><text:span text:style-name="T2">(50/9) </text:span> [ϩ]ⲛ ⲟⲩⲙⲛⲧ’[ <text:line-break/><text:span text:style-name="T1"> </text:span><text:span text:style-name="T2">(50/10) </text:span> [.]ⲣ[.] ⲅ̣ⲁⲣ ϣ[ <text:line-break/><text:span text:style-name="T1"> </text:span><text:span text:style-name="T2">(50/11) </text:span> [..].ⲩ ⲁⲛ· [ <text:line-break/><text:span text:style-name="T1"> </text:span><text:span text:style-name="T2">(50/12) </text:span> (Lines 12 and following do not survive) <text:line-break/><text:span text:style-name="T1"> </text:span><text:span text:style-name="T2">(51/1) </text:span> [ ]ⲟϥ ϩⲛ <text:line-break/><text:span text:style-name="T1"> </text:span><text:span text:style-name="T2">(51/2) </text:span> [ ]ⲑ̅ⲟ̅ⲣ̅ⲥ̅ⲟ̅.̅.̅ⲥ̅ <text:line-break/><text:span text:style-name="T1"> </text:span><text:span text:style-name="T2">(51/3) </text:span> [ ]ⲛⲟⲩⲥⲓⲅⲏ <text:line-break/><text:span text:style-name="T1"> </text:span><text:span text:style-name="T2">(51/4) </text:span> [ ⲙ]ⲙⲟϥ ⲡⲉ <text:line-break/><text:span text:style-name="T1"> </text:span><text:span text:style-name="T2">(51/5) </text:span> [ ].ⲡ̣ⲉ ⲡⲉ ⲡⲛⲟⲩ‐ <text:line-break/><text:span text:style-name="T1"> </text:span><text:span text:style-name="T2">(51/6) </text:span> [ⲧⲉ ]. ⲛⲉⲛⲥⲙⲟⲩ <text:line-break/><text:span text:style-name="T1"> </text:span><text:span text:style-name="T2">(51/7) </text:span> [ ]ⲛ ⲡⲓ̅ⲅ̅ⲉ̅ⲣ̅ⲁ̅ⲇ̅ⲁ̅ⲙ̅ⲁ̣̅̅[ <text:line-break/><text:span text:style-name="T1"> </text:span><text:span text:style-name="T2">(51/8) </text:span> [ ]..ⲁⲁⲩ ⲛⲧⲉ ⲛ̣[. <text:line-break/><text:span text:style-name="T1"> </text:span><text:span text:style-name="T2">(51/9) </text:span> [ ]ⲧⲛ ⲧⲉ ϯⲉⲟ[ⲟⲩ] <text:line-break/><text:soft-page-break/><text:span text:style-name="T1"> </text:span><text:span text:style-name="T2">(51/10) </text:span> [ ]ⲡⲉⲛⲟ[ <text:line-break/><text:span text:style-name="T1"> </text:span><text:span text:style-name="T2">(51/11) </text:span> [ ]ⲙⲁⲁⲩ[ <text:line-break/><text:span text:style-name="T1"> </text:span><text:span text:style-name="T2">(51/12) </text:span> [.......] ⲙⲛ ⲡⲗ̅ⲏ̅ⲥ̅ⲓ̅ⲑ̅ⲉ̅ⲁ̅ <text:line-break/><text:span text:style-name="T1"> </text:span><text:span text:style-name="T2">(51/13) </text:span> [ⲧⲙⲁⲁⲩ] ⲛⲧⲉ ⲛⲓⲁⲅⲅⲉⲗⲟⲥ ⲙⲛ <text:line-break/><text:span text:style-name="T1"> </text:span><text:span text:style-name="T2">(51/14) </text:span> [ⲡⲓϣⲏⲣ]ⲉ ⲛⲧⲉ ⲁ̅ⲇ̅ⲁ̅ⲙ̅ⲁ̅ⲥ̅ ⲥ̅ⲏ[ⲑ̅] <text:line-break/><text:span text:style-name="T1"> </text:span><text:span text:style-name="T2">(51/15) </text:span> [ⲉⲙⲙⲁ]ⲭ̣ⲁ ⲥ̅ⲏ̅ⲑ̅ ⲡⲓⲱⲧ’ ⲛⲧ[ⲉ] <text:line-break/><text:span text:style-name="T1"> </text:span><text:span text:style-name="T2">(51/16) </text:span> [ϯⲅⲉⲛ]ⲉⲁ ⲛⲛ ⲁⲧ’ⲕⲓⲙ ⲙⲛ̣[.. <text:line-break/><text:span text:style-name="T1"> </text:span><text:span text:style-name="T2">(51/17) </text:span> [ⲡⲓϥⲧ]ⲟⲟⲩ ⲙ ⲫ[ⲱ]ⲥⲧⲏⲣ ⲁ̅ⲣ̅ⲙ̣̅̅[̅ⲟ̅ⲍ̅ⲏ̅ⲥ̅] <text:line-break/><text:span text:style-name="T1"> </text:span><text:span text:style-name="T2">(51/18) </text:span> [ⲱ̅ⲣ̅ⲟ̅ⲓ̅̈̅ⲁ̅]̅ⲏ̅ⲗ̅ ⲛ̅ⲇⲁⲩⲉⲓⲑⲉ̅· ⲏ̅ⲗⲏⲗ̣ⲏⲑ̅· <text:line-break/><text:span text:style-name="T1"> </text:span><text:span text:style-name="T2">(51/19) </text:span> [......] ⲁⲛⲥⲙⲟⲩ ⲕⲁⲧⲁ ⲣⲁⲛ· <text:line-break/><text:span text:style-name="T1"> </text:span><text:span text:style-name="T2">(51/20) </text:span> [.....] ⲛⲁⲩ ⲉⲣⲟϥ ⲡⲓⲣⲉϥⲁⲙⲁϩ‐ <text:line-break/><text:span text:style-name="T1"> </text:span><text:span text:style-name="T2">(51/21) </text:span> [ⲧⲉ ⲙ ⲡⲉ]ⲟⲟⲩ ⲡⲁⲗⲟⲩ ⲛ ϣⲙⲧ’‐ <text:line-break/><text:span text:style-name="T1"> </text:span><text:span text:style-name="T2">(51/22) </text:span> [.....] ⲛ ϣⲙⲧ’ϩⲟⲟⲩⲧ’ ⲛ <text:line-break/><text:span text:style-name="T1"> </text:span><text:span text:style-name="T2">(51/23) </text:span> [....]ⲟ̣ⲩⲙⲛⲧ’ⲛⲟϭ ⲉⲛϫⲱ <text:line-break/><text:span text:style-name="T1"> </text:span><text:span text:style-name="T2">(51/24) </text:span> [ⲙⲙⲟ]ⲥ̣ ϫⲉ ⲛⲧⲕⲟⲩⲁ ⲛⲧⲕ‐ <text:line-break/><text:span text:style-name="T1"> </text:span><text:span text:style-name="T2">(51/25) </text:span> [ⲟⲩⲁ ⲛ]ⲧⲕ ⲟⲩⲁ ⲡⲓⲁⲗⲟⲩ <text:line-break/><text:span text:style-name="T1"> </text:span><text:span text:style-name="T2">(52/1) </text:span> ⲛⲧ̣[ⲉ ⲡⲓⲁⲗⲟⲩ <text:line-break/><text:span text:style-name="T1"> </text:span><text:span text:style-name="T2">(52/2) </text:span> ⲓ̈ⲁ̅ⲧ̅ⲟ̣̅̅[ <text:line-break/><text:span text:style-name="T1"> </text:span><text:span text:style-name="T2">(52/3) </text:span> ϣⲟⲟ[ⲡ’ <text:line-break/><text:span text:style-name="T1"> </text:span><text:span text:style-name="T2">(52/4) </text:span> ⲉⲁⲥ ⲉ̅.[ <text:line-break/><text:span text:style-name="T1"> </text:span><text:span text:style-name="T2">(52/5) </text:span> ⲙ ⲙⲟⲏ[ ⲛ]‐ <text:line-break/><text:span text:style-name="T1"> </text:span><text:span text:style-name="T2">(52/6) </text:span> ⲧⲕⲟⲩⲁ ⲛⲧ̣[ⲕⲟⲩⲁ <text:line-break/><text:span text:style-name="T1"> </text:span><text:span text:style-name="T2">(52/7) </text:span> ⲥ̣ⲉ̅ⲙ̅ⲉ̅ⲗ̅ⲉ̅ⲗ̅ [ <text:line-break/><text:span text:style-name="T1"> </text:span><text:span text:style-name="T2">(52/8) </text:span> ⲧ̣ⲉ̅ⲗ̅ⲙ̅ⲁ̅ⲭ̅ⲁ̅ⲏ̣̅̅[ <text:line-break/><text:span text:style-name="T1"> </text:span><text:span text:style-name="T2">(52/9) </text:span> ⲱ̅ⲙ̅ⲱ̅ⲑ̅ⲉ̅ⲙ̅[ <text:line-break/><text:span text:style-name="T1"> </text:span><text:span text:style-name="T2">(52/10) </text:span> [ϩ]ⲟ̣[ⲟ]ⲩⲧ’ ⲡ[ <text:line-break/><text:span text:style-name="T1"> </text:span><text:span text:style-name="T2">(52/11) </text:span> [..]ⲉϥϫⲡ[ⲟ ⲡⲓⲣⲉϥⲁ]‐ <text:line-break/><text:span text:style-name="T1"> </text:span><text:span text:style-name="T2">(52/12) </text:span> ⲙⲁϩⲧⲉ ⲙ ⲡⲉ̣[ⲟⲟⲩ <text:line-break/><text:span text:style-name="T1"> </text:span><text:span text:style-name="T2">(52/13) </text:span> ϣ ⲟⲩⲁϣϥ ⲡⲏ ⲉⲧⲛ[ <text:line-break/><text:span text:style-name="T1"> </text:span><text:span text:style-name="T2">(52/14) </text:span> ⲡⲁⲛⲧⲉⲗⲓⲟⲥ ⲡⲁⲛ[ <text:line-break/><text:span text:style-name="T1"> </text:span><text:span text:style-name="T2">(52/15) </text:span> ⲧⲏⲣⲟⲩ·ʹ264 ⲁ̅ⲕ̅ⲣ̅ⲱ̅ⲛ̅ [ <text:line-break/><text:span text:style-name="T1"> </text:span><text:span text:style-name="T2">(52/16) </text:span> ⲡ̣ⲓϣⲙⲧ’ϩⲟⲟⲩⲧ’ ⲁⲁ[ <text:line-break/><text:span text:style-name="T1"> </text:span><text:span text:style-name="T2">(52/17) </text:span> ⲱⲱⲱⲱⲱⲃʹ269ⲧⲣⲉⲓⲥⲉ̣[ <text:line-break/><text:span text:style-name="T1"> </text:span><text:span text:style-name="T2">(52/18) </text:span> ⲛⲧⲕⲟⲩⲡ̅ⲛ̅ⲁ̅ ⲉⲃⲟⲗ ϩⲛ [ⲟⲩ]‐ <text:line-break/><text:span text:style-name="T1"> </text:span><text:span text:style-name="T2">(52/19) </text:span> ⲡ̅ⲛ̅ⲁ̅· ⲛ̅ⲧⲕ̅〈ⲟⲩ〉ⲟⲩⲟⲉⲓⲛ ⲉ̣[ⲃⲟⲗ] <text:line-break/><text:span text:style-name="T1"> </text:span><text:span text:style-name="T2">(52/20) </text:span> ϩⲛ 〈ⲟⲩ〉ⲟⲩⲟⲉⲓⲛ· ⲛⲧⲕ[ⲟⲩⲥⲓⲅⲏ] <text:line-break/><text:span text:style-name="T1"> </text:span><text:span text:style-name="T2">(52/21) </text:span> ⲉⲃⲟⲗ ϩⲛ ⲟⲩⲥⲓⲅⲏ· ⲛ̣[ⲧⲕⲟⲩ]‐ <text:line-break/><text:span text:style-name="T1"> </text:span><text:span text:style-name="T2">(52/22) </text:span> ⲉⲛⲛⲟⲓⲁ ⲉⲃⲟⲗ ϩⲛ ⲟ̣[ⲩⲉⲛ]‐ <text:line-break/><text:span text:style-name="T1"> </text:span><text:span text:style-name="T2">(52/23) </text:span> ⲛⲟⲓⲁ ⲡϣⲏⲣⲉ ⲛⲧ̣[ⲉ ⲡⲛⲟⲩ]‐ <text:line-break/><text:span text:style-name="T1"> </text:span><text:span text:style-name="T2">(52/24) </text:span> ⲧⲉ ⲡⲛⲟⲩⲧⲉ ⲍ̅ ⲡ̅{2̅ⲩ}2[.. <text:line-break/><text:span text:style-name="T1"> </text:span><text:span text:style-name="T2">(52/25) </text:span> ʹ266ⲱ̅ʹ267 ⲙⲁⲣⲛϫⲟⲟϥ [ <text:line-break/><text:span text:style-name="T1"> </text:span><text:span text:style-name="T2">(53/1) </text:span> [ ]ϥ· <text:line-break/><text:span text:style-name="T1"> </text:span><text:span text:style-name="T2">(53/2) </text:span> [ ]ⲟϥ <text:line-break/><text:span text:style-name="T1"> </text:span><text:span text:style-name="T2">(53/3) </text:span> [ ]ⲛϫⲟ <text:line-break/><text:span text:style-name="T1"> </text:span><text:span text:style-name="T2">(53/4) </text:span> [.........]ϣⲁϫⲉ <text:line-break/><text:span text:style-name="T1"> </text:span><text:span text:style-name="T2">(53/5) </text:span> [.........·ⲛⲉ ϯⲛⲟⲩ̣[ <text:line-break/><text:span text:style-name="T1"> </text:span><text:span text:style-name="T2">(53/6) </text:span> [.........] ⲙⲛ ϯⲛⲟ̣[ <text:line-break/><text:soft-page-break/><text:span text:style-name="T1"> </text:span><text:span text:style-name="T2">(53/7) </text:span> [.......]ⲟ̣ⲩⲧⲉ ⲉⲃⲟ[ⲗ <text:line-break/><text:span text:style-name="T1"> </text:span><text:span text:style-name="T2">(53/8) </text:span> [.......]ⲩ̣ⲥⲟⲡ’ ⲁⲛ ⲥⲙ[ <text:line-break/><text:span text:style-name="T1"> </text:span><text:span text:style-name="T2">(53/9) </text:span> [.......]ⲓ̣ⲁ̣ⲧⲛⲁⲩ ⲉⲣⲟ̣[%1 <text:line-break/><text:span text:style-name="T1"> </text:span><text:span text:style-name="T2">(53/10) </text:span> [.......ⲃ̅]̅ⲁ̣̅̅ⲣ̅ⲃ̅ⲏ̅ⲗ̅[̅ⲱ̅ <text:line-break/><text:span text:style-name="T1"> </text:span><text:span text:style-name="T2">(53/11) </text:span> [.......] ⲡⲓⲁⲧ’[ <text:line-break/><text:span text:style-name="T1"> </text:span><text:span text:style-name="T2">(53/12) </text:span> [.....] ⲡⲓⲡ̅ⲣ̅ⲱ̅ⲛ̅ⲏ̅ⲥ̅ ⲛ <text:line-break/><text:span text:style-name="T1"> </text:span><text:span text:style-name="T2">(53/13) </text:span> [ϣⲙⲧ’]ϩⲟⲟⲩⲧ’ ⲙⲛ ⲧⲁⲛⲓⲉⲟ‐ <text:line-break/><text:span text:style-name="T1"> </text:span><text:span text:style-name="T2">(53/14) </text:span> [ⲟⲩ ⲧⲏ]ⲣⲟⲩ ⲓ̈ⲟ̅ⲩ̅ⲏ̅ⲗ̅· ⲁⲩⲱ <text:line-break/><text:span text:style-name="T1"> </text:span><text:span text:style-name="T2">(53/15) </text:span> [ⲉⲧⲁⲓ̈]ϫⲱⲕⲙ ⲙ ⲡⲙⲉϩϯⲟⲩ <text:line-break/><text:span text:style-name="T1"> </text:span><text:span text:style-name="T2">(53/16) </text:span> [ⲛ ⲥⲟ]ⲡ’ ⲉ ⲡⲣⲁⲛ ⲛⲧⲉ ⲡⲓⲁⲩ‐ <text:line-break/><text:span text:style-name="T1"> </text:span><text:span text:style-name="T2">(53/17) </text:span> [ⲧⲟ]ⲅ̣ⲉⲛⲏⲥ ⲉⲃⲟⲗ ϩⲓⲧⲟⲟⲧ[ⲟⲩ] <text:line-break/><text:span text:style-name="T1"> </text:span><text:span text:style-name="T2">(53/18) </text:span> ⲛ ⲛ]ⲉⲓ̈ϭⲟⲙ ⲛⲉⲓ̈ϭⲟⲙ ⲁⲉⲓ‐ <text:line-break/><text:span text:style-name="T1"> </text:span><text:span text:style-name="T2">(53/19) </text:span> [ϣ]ⲱ̣ⲡⲉ ⲛⲛ ⲟⲩⲛⲟⲩⲧⲉ <text:line-break/><text:span text:style-name="T1"> </text:span><text:span text:style-name="T2">(53/20) </text:span> [ⲁⲓ̈ⲁϩⲉ]ⲣ̣ⲁⲧ’ ϩⲓϫⲛ ⲡⲓⲙⲉϩϯ‐ <text:line-break/><text:span text:style-name="T1"> </text:span><text:span text:style-name="T2">(53/21) </text:span> [ⲟⲩ ⲛⲛ] ⲉⲱⲛ ⲛ ϭⲱⲣϭ ⲛⲧⲉ <text:line-break/><text:span text:style-name="T1"> </text:span><text:span text:style-name="T2">(53/22) </text:span> [ⲛⲁⲓ̈ ⲧ]ⲏ̣ⲣⲟⲩ· ⲁⲉⲓⲛⲁⲩ ⲉ ⲛⲁ‐ <text:line-break/><text:span text:style-name="T1"> </text:span><text:span text:style-name="T2">(53/23) </text:span> [ⲡⲓⲁⲩ]ⲧⲟⲅⲉⲛⲏⲥ ⲧⲏⲣⲟⲩ <text:line-break/><text:span text:style-name="T1"> </text:span><text:span text:style-name="T2">(53/24) </text:span> [ⲛⲏ ⲉ]ⲧ’ϣ̣ⲟ̣[ⲟ]ⲡ’ ⲟⲛⲧⲱⲥ <text:line-break/><text:span text:style-name="T1"> </text:span><text:span text:style-name="T2">(53/25) </text:span> [ⲁⲩ]ⲱ [ⲁ]ⲉⲓϫⲱⲕⲙ ⲛ ϯⲟⲩ <text:line-break/><text:span text:style-name="T1"> </text:span><text:span text:style-name="T2">(54/1) </text:span> ⲛ ⲥⲟ̣[ⲡ <text:line-break/><text:span text:style-name="T1"> </text:span><text:span text:style-name="T2">(54/2) </text:span> ⲙⲛ ⲓ̣̈[ <text:line-break/><text:span text:style-name="T1"> </text:span><text:span text:style-name="T2">(54/3) </text:span> ⲛⲧⲉ ⲡ̣[ <text:line-break/><text:span text:style-name="T1"> </text:span><text:span text:style-name="T2">(54/4) </text:span> ⲍ̅ⲁ̅ⲣ̅ⲉ̅ⲩ̅[ <text:line-break/><text:span text:style-name="T1"> </text:span><text:span text:style-name="T2">(54/5) </text:span> ⲉⲃⲟⲗ ϩ[ⲛ ⲉ]‐ <text:line-break/><text:span text:style-name="T1"> </text:span><text:span text:style-name="T2">(54/6) </text:span> ⲧⲙⲙⲁⲩ[ <text:line-break/><text:span text:style-name="T1"> </text:span><text:span text:style-name="T2">(54/7) </text:span> ⲛ ⲧⲉⲗⲓⲟⲥ̣ [ <text:line-break/><text:span text:style-name="T1"> </text:span><text:span text:style-name="T2">(54/8) </text:span> ⲙⲛ ϯⲛⲟϭ ⲙ [ <text:line-break/><text:span text:style-name="T1"> </text:span><text:span text:style-name="T2">(54/9) </text:span> [ⲉ]ⲟⲟ̣ⲩ ⲧⲁⲛ[ <text:line-break/><text:span text:style-name="T1"> </text:span><text:span text:style-name="T2">(54/10) </text:span> [...]ⲛⲟⲥ ⲛ [ <text:line-break/><text:span text:style-name="T1"> </text:span><text:span text:style-name="T2">(54/11) </text:span> [ⲛⲟ]ⲩⲧⲉ· ϯ[ <text:line-break/><text:span text:style-name="T1"> </text:span><text:span text:style-name="T2">(54/12) </text:span> ⲟⲩⲱⲛϩ ⲉⲃⲟⲗ ..[ <text:line-break/><text:span text:style-name="T1"> </text:span><text:span text:style-name="T2">(54/13) </text:span> ⲧⲉⲗⲓⲟⲥ ⲉⲧ’ⲕⲏⲃ ⲧⲏ[ⲣ%1 <text:line-break/><text:span text:style-name="T1"> </text:span><text:span text:style-name="T2">(54/14) </text:span> ⲧⲁⲛⲓⲉⲓⲇⲟⲥ ⲧⲏⲣⲟⲩ [ <text:line-break/><text:span text:style-name="T1"> </text:span><text:span text:style-name="T2">(54/15) </text:span> ⲛ ϩⲟⲟⲩⲧ’· ϯⲣⲉϥⲁ[ⲙⲁϩⲧⲉ] <text:line-break/><text:span text:style-name="T1"> </text:span><text:span text:style-name="T2">(54/16) </text:span> ⲙ̣ ⲡⲉⲟⲟⲩ· ⲧⲙⲁⲁⲩ [ <text:line-break/><text:span text:style-name="T1"> </text:span><text:span text:style-name="T2">(54/17) </text:span> [ⲛ]ⲓⲉⲟⲟⲩ ⲓ̈ⲟ̅ⲩ̅ⲏ̅ⲗ̅ ⲙⲛ ⲡ[ⲓϥⲧⲟ]‐ <text:line-break/><text:span text:style-name="T1"> </text:span><text:span text:style-name="T2">(54/18) </text:span> ⲟⲩ ⲙ ⲫⲱⲥⲧⲏⲣ ⲛ ⲧⲉ̣[ⲗⲓⲟⲥ <text:line-break/><text:span text:style-name="T1"> </text:span><text:span text:style-name="T2">(54/19) </text:span> ⲡⲣⲱⲧⲟⲫⲁⲛⲏⲥ ⲛ̣[ⲧⲉ ⲡⲓⲛⲟϭ] <text:line-break/><text:span text:style-name="T1"> </text:span><text:span text:style-name="T2">(54/20) </text:span> ⲛ ⲛⲟⲩⲥ ⲥ̅ⲉ̅ⲗ̅ⲙ̅ⲉ̅ⲛ̅ ⲙ[ⲛ ⲛⲏ ⲉⲧ]‐ <text:line-break/><text:span text:style-name="T1"> </text:span><text:span text:style-name="T2">(54/21) </text:span> ⲕⲏ ⲛⲙⲙⲁϥ ⲛⲓⲣⲉϥ[ⲟⲩⲉⲛϩ] <text:line-break/><text:span text:style-name="T1"> </text:span><text:span text:style-name="T2">(54/22) </text:span> ⲛⲟⲩⲧⲉ ⲉⲃⲟⲗ· ⲍⲁⲭⲑ̣[ⲟⲥ] <text:line-break/><text:span text:style-name="T1"> </text:span><text:span text:style-name="T2">(54/23) </text:span> ⲙⲛ ⲓ̈ⲁ̅ⲭ̅ⲑ̅ⲟ̅ⲥ̅· ⲥ̅ⲏⲑⲉ̅[ⲩⲥ] <text:line-break/><text:span text:style-name="T1"> </text:span><text:span text:style-name="T2">(54/24) </text:span> ⲙⲛ ⲁ̅ⲛ̅ⲧ̅ⲓ̅ⲫ̅ⲁ̅ⲛ̅[̅ⲧ̅ⲏ̅]̅ⲥ̅· [ⲥ̅ⲉⲗ̅]‐ <text:line-break/><text:span text:style-name="T1"> </text:span><text:span text:style-name="T2">(54/25) </text:span> ⲇ̅ⲁ̅ⲱ̅· ⲙⲛ ⲉⲗⲉ[ⲛ]ⲟ̣ⲥ̣ [ <text:line-break/><text:span text:style-name="T1"> </text:span><text:span text:style-name="T2">(55/1) </text:span> [ ].ⲧⲟ <text:line-break/><text:span text:style-name="T1"> </text:span><text:span text:style-name="T2">(55/2) </text:span> [ ]ⲛ ⲉⲓ <text:line-break/><text:span text:style-name="T1"> </text:span><text:span text:style-name="T2">(55/3) </text:span> [ ] ⲉ ⲡⲓⲁ‐ <text:line-break/><text:soft-page-break/><text:span text:style-name="T1"> </text:span><text:span text:style-name="T2">(55/4) </text:span> [ ]ⲱⲛⲉⲩ <text:line-break/><text:span text:style-name="T1"> </text:span><text:span text:style-name="T2">(55/5) </text:span> [ ]ⲉⲓⲛⲉ <text:line-break/><text:span text:style-name="T1"> </text:span><text:span text:style-name="T2">(55/6) </text:span> [ ]ⲟⲟⲡ’ ⲛ <text:line-break/><text:span text:style-name="T1"> </text:span><text:span text:style-name="T2">(55/7) </text:span> [ ]ⲛ̣ⲧⲉ ⲛⲓⲁⲩ‐ <text:line-break/><text:span text:style-name="T1"> </text:span><text:span text:style-name="T2">(55/8) </text:span> [ ]ⲛⲁⲩ ⲅⲁⲣ ⲉ <text:line-break/><text:span text:style-name="T1"> </text:span><text:span text:style-name="T2">(55/9) </text:span> [ ]ⲉ̣ⲱⲛ ⲉⲩⲉⲓ‐ <text:line-break/><text:span text:style-name="T1"> </text:span><text:span text:style-name="T2">(55/10) </text:span> [ ]ϩⲟⲩⲟ <text:line-break/><text:span text:style-name="T1"> </text:span><text:span text:style-name="T2">(55/11) </text:span> [ ⲫ]ⲱⲥⲧⲏ[ⲣ <text:line-break/><text:span text:style-name="T1"> </text:span><text:span text:style-name="T2">(55/12) </text:span> [........]ⲛ ⲛ̣[ⲓ]ⲉⲟⲟⲩ ⲛϩⲟⲩⲟ <text:line-break/><text:span text:style-name="T1"> </text:span><text:span text:style-name="T2">(55/13) </text:span> [.....] ⲛⲁ̣ⲓ̣̈ ⲛⲉ ⲕⲁⲧⲁ ⲡⲟⲩⲁ <text:line-break/><text:span text:style-name="T1"> </text:span><text:span text:style-name="T2">(55/14) </text:span> [ⲡⲟⲩⲁ] ⲛⲧⲉ ⲛⲓⲉⲱⲛ· ⲟⲩ‐ <text:line-break/><text:span text:style-name="T1"> </text:span><text:span text:style-name="T2">(55/15) </text:span> [ⲕⲁϩ ⲉ]ϥⲟⲛϩ ⲙⲛ ⲟⲩⲙⲟⲟⲩ <text:line-break/><text:span text:style-name="T1"> </text:span><text:span text:style-name="T2">(55/16) </text:span> [ⲉϥⲟⲛ]ϩ ⲙⲛ ⲟⲩⲁⲏⲣ ⲉϥⲉ ⲛ <text:line-break/><text:span text:style-name="T1"> </text:span><text:span text:style-name="T2">(55/17) </text:span> [ⲟⲩ]ⲟ̣ⲉⲓⲛ ⲙⲛ ⲟⲩⲕⲱϩⲧ’ <text:line-break/><text:span text:style-name="T1"> </text:span><text:span text:style-name="T2">(55/18) </text:span> [ⲉϥⲡ]ⲣⲣⲓⲱⲟⲩ ⲉⲃⲟⲗ ⲉⲙⲁϥ‐ <text:line-break/><text:span text:style-name="T1"> </text:span><text:span text:style-name="T2">(55/19) </text:span> [ⲣⲱ]ⲕ̣ϩ ⲙⲛ ϩⲉⲛⲍⲱⲟⲛ ⲁⲩⲱ <text:line-break/><text:span text:style-name="T1"> </text:span><text:span text:style-name="T2">(55/20) </text:span> [ϩⲉⲛϣ]ⲏⲛ· ⲁⲩⲱ ϩⲉⲛⲯⲩⲭⲏ <text:line-break/><text:span text:style-name="T1"> </text:span><text:span text:style-name="T2">(55/21) </text:span> [ⲙⲛ ϩ]ⲉⲛⲛⲟⲩⲥ ⲙⲛ ϩⲉⲛⲣⲱⲙⲉ <text:line-break/><text:span text:style-name="T1"> </text:span><text:span text:style-name="T2">(55/22) </text:span> [ⲙⲛ ⲛ]ⲏ ⲧⲏⲣⲟⲩ ⲉⲧ’ϣⲟⲟⲡ’ <text:line-break/><text:span text:style-name="T1"> </text:span><text:span text:style-name="T2">(55/23) </text:span> [ⲛⲙⲙⲁ]ⲩ· ϩⲉⲛⲛⲟⲩⲧⲉ ⲇⲉ <text:line-break/><text:span text:style-name="T1"> </text:span><text:span text:style-name="T2">(55/24) </text:span> [ⲙⲛ] ϩⲉⲛϭⲟ[ⲙ] ⲁⲩⲱ ϩⲉⲛⲁⲅ‐ <text:line-break/><text:span text:style-name="T1"> </text:span><text:span text:style-name="T2">(55/25) </text:span> [ⲅⲉ]ⲗ̣ⲟⲥ ⲁⲛ̣· ⲛⲁⲓ̈ ⲧⲏⲣⲟⲩ ⲅⲁⲣ <text:line-break/><text:span text:style-name="T1"> </text:span><text:span text:style-name="T2">(56/1) </text:span> ⲛⲉϩ[ <text:line-break/><text:span text:style-name="T1"> </text:span><text:span text:style-name="T2">(56/2) </text:span> ⲁⲩⲱ [ <text:line-break/><text:span text:style-name="T1"> </text:span><text:span text:style-name="T2">(56/3) </text:span> ⲁⲩⲱ ⲛ[ <text:line-break/><text:span text:style-name="T1"> </text:span><text:span text:style-name="T2">(56/4) </text:span> ϣⲟⲟⲡ’ [ <text:line-break/><text:span text:style-name="T1"> </text:span><text:span text:style-name="T2">(56/5) </text:span> ⲧⲏⲣⲟⲩ [ <text:line-break/><text:span text:style-name="T1"> </text:span><text:span text:style-name="T2">(56/6) </text:span> ⲧⲏ̣ⲣⲟⲩ ⲉ̣[ <text:line-break/><text:span text:style-name="T1"> </text:span><text:span text:style-name="T2">(56/7) </text:span> [.]ⲩ ⲧⲏⲣⲟⲩ [ <text:line-break/><text:span text:style-name="T1"> </text:span><text:span text:style-name="T2">(56/8) </text:span> ⲛ̣ⲉ· ⲉⲩⲉ ⲛ .[ <text:line-break/><text:span text:style-name="T1"> </text:span><text:span text:style-name="T2">(56/9) </text:span> [ⲁ]ⲩⲱ ⲉⲩⲉ̣[ <text:line-break/><text:span text:style-name="T1"> </text:span><text:span text:style-name="T2">(56/10) </text:span> [..]ⲁ̣ ⲁⲩⲱ [ <text:line-break/><text:span text:style-name="T1"> </text:span><text:span text:style-name="T2">(56/11) </text:span> [ⲁⲩ]ⲱ ⲛⲏ ⲉ̣[.].[ <text:line-break/><text:span text:style-name="T1"> </text:span><text:span text:style-name="T2">(56/12) </text:span> ⲟⲧϥ ⲙ ⲡⲓⲁⲩⲧⲟ̣ⲅ̣ⲉⲛ[ⲏⲥ ⲁⲩⲱ ⲁⲓ̈]‐ <text:line-break/><text:span text:style-name="T1"> </text:span><text:span text:style-name="T2">(56/13) </text:span> ϫⲓ ⲉⲓⲛⲉ ⲉⲃⲟⲗ ϩⲛ ⲛⲁⲓ̈ [ⲧⲏⲣⲟⲩ ⲁⲩ]‐ <text:line-break/><text:span text:style-name="T1"> </text:span><text:span text:style-name="T2">(56/14) </text:span> ⲟⲩⲱⲛ ⲛϭⲓ ⲛⲓⲉⲱⲛ ⲛ̣[ⲧⲉ ⲡⲓ] <text:line-break/><text:span text:style-name="T1"> </text:span><text:span text:style-name="T2">(56/15) </text:span> ⲁ̣ⲩⲧⲟⲅⲉⲛⲏⲥ ⲟⲩⲛⲟ̣[ϭ ⲛ ⲟⲩⲟ]‐ <text:line-break/><text:span text:style-name="T1"> </text:span><text:span text:style-name="T2">(56/16) </text:span> ⲉⲓⲛ ϣⲁϥⲡⲓⲣⲉ ⲉϩⲣⲁⲓ̈ ⲉ̣[ <text:line-break/><text:span text:style-name="T1"> </text:span><text:span text:style-name="T2">(56/17) </text:span> ⲉ̣ⲃⲟⲗ ϩⲛ ⲛⲓⲉⲱⲛ ⲛⲧⲉ ⲡ̣[ⲓϣⲙⲧ’]‐ <text:line-break/><text:span text:style-name="T1"> </text:span><text:span text:style-name="T2">(56/18) </text:span> ϩ̣ⲟⲟⲩⲧ’ ⲁⲩⲱ ⲛⲉⲩϯ [ⲉⲟⲟⲩ] <text:line-break/><text:span text:style-name="T1"> </text:span><text:span text:style-name="T2">(56/19) </text:span> ⲛⲁⲩ· ⲛⲉⲣⲉ ⲡⲓϥⲧⲟ̣[ⲟⲩ] <text:line-break/><text:span text:style-name="T1"> </text:span><text:span text:style-name="T2">(56/20) </text:span> ⲛⲛ ⲉⲱⲛ ⲛⲉⲩⲟⲩⲱϣ[ⲥ ⲉⲃⲟⲗ] <text:line-break/><text:span text:style-name="T1"> </text:span><text:span text:style-name="T2">(56/21) </text:span> ⲛϩⲣⲁⲓ̈ ϩⲛ ⲟⲩⲉⲱⲛ ⲛ ⲟ̣ⲩ̣[ <text:line-break/><text:span text:style-name="T1"> </text:span><text:span text:style-name="T2">(56/22) </text:span> ⲙ ⲡⲥⲙⲟⲧ’ ⲛⲛ ⲟⲩⲉ[ <text:line-break/><text:span text:style-name="T1"> </text:span><text:span text:style-name="T2">(56/23) </text:span> ⲟⲩⲱⲧ’ ⲉϥϣⲟⲟⲡ’ ⲙ.[ <text:line-break/><text:span text:style-name="T1"> </text:span><text:span text:style-name="T2">(56/24) </text:span> ⲁⲩⲱ ⲧⲟⲧⲉ ⲁϥ[..]ⲧ’ ⲛϭⲓ ⲏ̣̅̅[̅ⲫ̅ⲏ̅ⲥ̅ⲏ̅ⲭ̅] <text:line-break/><text:span text:style-name="T1"> </text:span><text:span text:style-name="T2">(56/25) </text:span> ⲡⲁⲗⲟⲩ ⲛⲧⲉ ⲡⲁ[ⲗ]ⲟ̣ⲩ ⲁ[ <text:line-break/><text:soft-page-break/><text:span text:style-name="T1"> </text:span><text:span text:style-name="T2">(57/1) </text:span> [ ].ⲁ <text:line-break/><text:span text:style-name="T1"> </text:span><text:span text:style-name="T2">(57/2) </text:span> [ ]ⲉⲩ <text:line-break/><text:span text:style-name="T1"> </text:span><text:span text:style-name="T2">(57/3) </text:span> [ ]ⲟⲩⲥ <text:line-break/><text:span text:style-name="T1"> </text:span><text:span text:style-name="T2">(57/4) </text:span> [ ]ⲁ̣ⲧⲟⲩ <text:line-break/><text:span text:style-name="T1"> </text:span><text:span text:style-name="T2">(57/5) </text:span> [ ⲓ̈ⲉ̅ⲥ̅ⲥ̅ⲉ̅ⲩ̅ⲥ̅] ⲙⲁ̅ⲍⲁ̅‐ <text:line-break/><text:span text:style-name="T1"> </text:span><text:span text:style-name="T2">(57/6) </text:span> [ⲣ̅ⲉ̅ⲩ̅ⲥ̅ ⲓ̈ⲉ̅ⲥⲥⲉⲇⲉ]ⲕ̣ⲉⲩⲥ̅ [.] . <text:line-break/><text:span text:style-name="T1"> </text:span><text:span text:style-name="T2">(57/7) </text:span> [ ]ⲟⲙ ⲛⲧⲉ̣[ <text:line-break/><text:span text:style-name="T1"> </text:span><text:span text:style-name="T2">(57/8) </text:span> [......ⲥⲫⲣ]ⲁ̣ⲅ̣ⲓⲥ ϩⲱⲱϥ <text:line-break/><text:span text:style-name="T1"> </text:span><text:span text:style-name="T2">(57/9) </text:span> [.......].[...] ⲙ̣ⲛ ⲅⲁⲃ̣ⲣ̣ⲓⲏ[ⲗ] <text:line-break/><text:span text:style-name="T1"> </text:span><text:span text:style-name="T2">(57/10) </text:span> [.......] ⲛ [...] ⲛ ⲟⲩ[. <text:line-break/><text:span text:style-name="T1"> </text:span><text:span text:style-name="T2">(57/11) </text:span> [.......].ⲩ.[.]ⲉⲛⲥⲫⲣⲁⲅⲓ̣[ⲥ] <text:line-break/><text:span text:style-name="T1"> </text:span><text:span text:style-name="T2">(57/12) </text:span> [....]. ⲛ ϥⲧⲟⲟⲩ ⲛ ⲅⲉⲛⲟⲥ <text:line-break/><text:span text:style-name="T1"> </text:span><text:span text:style-name="T2">(57/13) </text:span> [ⲁⲩⲱ] ⲁ̣ⲥⲉⲓ ⲛⲛⲁϩⲣⲁⲓ̈ ⲛϭⲓ ⲧⲁ‐ <text:line-break/><text:span text:style-name="T1"> </text:span><text:span text:style-name="T2">(57/14) </text:span> [ⲛⲓⲉⲟ]ⲟⲩ ⲛ ϩⲟⲟⲩⲧ’ ⲁⲩⲱ ⲙ <text:line-break/><text:span text:style-name="T1"> </text:span><text:span text:style-name="T2">(57/15) </text:span> [ⲡⲁⲣⲑ]ⲉⲛⲓⲕⲟⲛ ⲓ̈ⲱ̅ⲏ̅ⲗ̅· ⲁⲩ[ⲱ] <text:line-break/><text:span text:style-name="T1"> </text:span><text:span text:style-name="T2">(57/16) </text:span> [ⲁⲉⲓ]ϣⲟϫⲛⲉ ⲉⲧⲃⲉ ⲛⲓⲕⲗⲟⲟ̣[ⲙ] <text:line-break/><text:span text:style-name="T1"> </text:span><text:span text:style-name="T2">(57/17) </text:span> [ⲡⲉϫ]ⲁⲥ ⲛⲁⲓ̈ ϫⲉ ⲉⲧⲃⲉ ⲟⲩ <text:line-break/><text:span text:style-name="T1"> </text:span><text:span text:style-name="T2">(57/18) </text:span> [ⲁϥϣ]ⲟϫⲛⲉ ⲛϭⲓ ⲡⲉⲕⲡⲛ̅ⲁ̅ <text:line-break/><text:span text:style-name="T1"> </text:span><text:span text:style-name="T2">(57/19) </text:span> [ⲉⲧⲃ]ⲉ ⲛⲓⲕⲗⲟⲟⲙ ⲙⲛ ⲛⲓ‐ <text:line-break/><text:span text:style-name="T1"> </text:span><text:span text:style-name="T2">(57/20) </text:span> [ⲥⲫⲣ]ⲁⲅⲓⲥ ⲉⲧ’ⲕⲏ ϩⲓⲱⲟⲩ <text:line-break/><text:span text:style-name="T1"> </text:span><text:span text:style-name="T2">(57/21) </text:span> [...] ⲛⲉ ⲛⲓⲕⲗⲟⲟⲙ ⲉⲧ’ϯ ϭⲟⲙ <text:line-break/><text:span text:style-name="T1"> </text:span><text:span text:style-name="T2">(57/22) </text:span> [ⲙ ⲡⲛ̅]ⲁ̅ ⲛⲓⲙ ⲙⲛ ⲯⲩⲭⲏ ⲛⲓⲙ <text:line-break/><text:span text:style-name="T1"> </text:span><text:span text:style-name="T2">(57/23) </text:span> [ⲛⲓⲥ]ⲫⲣⲁⲅⲓⲥ ⲇⲉ ⲉⲧ’ϣⲟⲟⲡ <text:line-break/><text:span text:style-name="T1"> </text:span><text:span text:style-name="T2">(57/24) </text:span> [ϩⲓ̅ ⲱ]ⲟⲩ ⲛⲓⲙⲛⲧ’ⲅⲉⲛⲟⲥ ⲙⲛ <text:line-break/><text:span text:style-name="T1"> </text:span><text:span text:style-name="T2">(57/25) </text:span> [..] ⲡⲓⲁϩⲟⲣⲁⲧⲟⲛ ⲙ ⲡ̅ⲛ̅ⲁ̅ <text:line-break/><text:span text:style-name="T1"> </text:span><text:span text:style-name="T2">(58/1) </text:span> ⲛ̣ⲉ ⲙ[ <text:line-break/><text:span text:style-name="T1"> </text:span><text:span text:style-name="T2">(58/2) </text:span> ⲑⲉⲛ[ⲟⲥ <text:line-break/><text:span text:style-name="T1"> </text:span><text:span text:style-name="T2">(58/3) </text:span> ⲛⲏ [ <text:line-break/><text:span text:style-name="T1"> </text:span><text:span text:style-name="T2">(58/4) </text:span> ⲙⲉⲛ [ <text:line-break/><text:span text:style-name="T1"> </text:span><text:span text:style-name="T2">(58/5) </text:span> ⲇⲉ ⲛ ⲱ̣[ <text:line-break/><text:span text:style-name="T1"> </text:span><text:span text:style-name="T2">(58/6) </text:span> ⲡⲁⲣⲑⲉ[ⲛⲟⲥ <text:line-break/><text:span text:style-name="T1"> </text:span><text:span text:style-name="T2">(58/7) </text:span> ..ⲥ ⲇⲉ ⲛ [ <text:line-break/><text:span text:style-name="T1"> </text:span><text:span text:style-name="T2">(58/8) </text:span> [.]ϣⲣ ⲁⲓⲧⲓ [ <text:line-break/><text:span text:style-name="T1"> </text:span><text:span text:style-name="T2">(58/9) </text:span> .ⲣⲟ ϩⲛ ⲛⲓ̣[ <text:line-break/><text:span text:style-name="T1"> </text:span><text:span text:style-name="T2">(58/10) </text:span> [ϩ]ⲏⲧⲟⲩ ⲛ[ <text:line-break/><text:span text:style-name="T1"> </text:span><text:span text:style-name="T2">(58/11) </text:span> [...]. ⲁⲩⲱ̣ [..]ⲡ̣[ <text:line-break/><text:span text:style-name="T1"> </text:span><text:span text:style-name="T2">(58/12) </text:span> [...]ʹ264 ⲁϥϯ [ϭⲟ]ⲙ ⲛ[ <text:line-break/><text:span text:style-name="T1"> </text:span><text:span text:style-name="T2">(58/13) </text:span> ⲛⲓⲥⲫⲣⲁⲅⲓⲥ̣ ⲇⲉ ⲛ̣ [ <text:line-break/><text:span text:style-name="T1"> </text:span><text:span text:style-name="T2">(58/14) </text:span> ⲅⲉⲛⲟⲥ ⲛⲁⲡⲓⲁⲩⲧⲟ̣[ⲅⲉⲛⲏⲥ] <text:line-break/><text:span text:style-name="T1"> </text:span><text:span text:style-name="T2">(58/15) </text:span> ⲛⲉ ⲙⲛ ⲡⲓⲡⲣⲱⲧⲟⲫⲁ̣[ⲛⲏⲥ] <text:line-break/><text:span text:style-name="T1"> </text:span><text:span text:style-name="T2">(58/16) </text:span> ⲙⲛ ⲡⲓⲕ̅ⲗ̅ⲥ̅· ⲁⲩⲱ ⲡⲓⲁ̣[ϩⲟⲣⲁ]‐ <text:line-break/><text:span text:style-name="T1"> </text:span><text:span text:style-name="T2">(58/17) </text:span> ⲧⲟⲛ ⲙ ⲡ̅ⲛ̅ⲁ̅ ⲟⲩϭⲟⲙ [ⲙ ⲯⲩ̅] <text:line-break/><text:span text:style-name="T1"> </text:span><text:span text:style-name="T2">(58/18) </text:span> ⲭ̣ⲓⲕⲟⲛ ⲁⲩⲱ ⲛ ⲛⲟⲉⲣ[ⲟⲛ ⲡⲉ] <text:line-break/><text:span text:style-name="T1"> </text:span><text:span text:style-name="T2">(58/19) </text:span> ⲟⲩⲣⲉϥⲉⲓⲙⲉ ⲁⲩⲱ ⲛ [ⲣⲉϥ]‐ <text:line-break/><text:span text:style-name="T1"> </text:span><text:span text:style-name="T2">(58/20) </text:span> ⲣ ϣⲟⲣⲡ’ ⲛ ⲉⲓⲙⲉ· ⲁⲩ[ⲱ ⲉ]‐ <text:line-break/><text:span text:style-name="T1"> </text:span><text:span text:style-name="T2">(58/21) </text:span> ⲧⲃⲉ ⲡⲁⲓ̈ ⲉϥⲛⲧⲟⲟⲧ[ϥ ⲛ ⲅⲁ]‐ <text:line-break/><text:span text:style-name="T1"> </text:span><text:span text:style-name="T2">(58/22) </text:span> ⲃⲣⲓⲏⲗ ⲡⲓⲣⲉϥϯ ⲡ̅ⲛ̅ⲁ̅· ϩⲛ̣ [ <text:line-break/><text:soft-page-break/><text:span text:style-name="T1"> </text:span><text:span text:style-name="T2">(58/23) </text:span> ⲉϣⲱⲡⲉ ⲉϥϣⲁⲛϯ ⲛ [ⲟⲩ]‐ <text:line-break/><text:span text:style-name="T1"> </text:span><text:span text:style-name="T2">(58/24) </text:span> ⲡ̅ⲛ̅ⲁ̅ ⲉϥⲟⲩⲁⲁⲃ ⲛϥⲣ ⲥⲫ[ⲣⲁ]‐ <text:line-break/><text:span text:style-name="T1"> </text:span><text:span text:style-name="T2">(58/25) </text:span> ⲅⲓⲍⲉ ⲙⲙⲟϥ ϩⲙ ⲡⲓⲕⲗ[ⲟⲙ] <text:line-break/><text:span text:style-name="T1"> </text:span><text:span text:style-name="T2">(58/26) </text:span> ⲁⲩⲱ ⲛϥϯ ⲕⲗⲟⲙ ⲛⲁϥ ⲉ̣[ⲩ]‐ <text:line-break/><text:span text:style-name="T1"> </text:span><text:span text:style-name="T2">(58/27) </text:span> ⲛⲧⲁϥ ⲛ ϩⲉⲛⲛⲟⲩⲧⲉ [ <text:line-break/><text:span text:style-name="T1"> </text:span><text:span text:style-name="T2">(59/1) </text:span> [ ⲟ]ⲩϭⲟⲙ <text:line-break/><text:span text:style-name="T1"> </text:span><text:span text:style-name="T2">(59/2) </text:span> [ ] ⲡ̣ⲓⲥⲁ <text:line-break/><text:span text:style-name="T1"> </text:span><text:span text:style-name="T2">(59/3) </text:span> [ ]ⲟⲃ <text:line-break/><text:span text:style-name="T1"> </text:span><text:span text:style-name="T2">(59/4) </text:span> [ ]ⲩ. <text:line-break/><text:span text:style-name="T1"> </text:span><text:span text:style-name="T2">(59/5) </text:span> [ ]ⲡⲓ. <text:line-break/><text:span text:style-name="T1"> </text:span><text:span text:style-name="T2">(59/6) </text:span> [ ]ⲧⲏⲣ ⲛⲁ[ <text:line-break/><text:span text:style-name="T1"> </text:span><text:span text:style-name="T2">(59/7) </text:span> [ ]ⲛ ⲉⲩⲱ[ <text:line-break/><text:span text:style-name="T1"> </text:span><text:span text:style-name="T2">(59/8) </text:span> [ ]ⲛⲡ̅ⲛ̅ⲁ̅ . <text:line-break/><text:span text:style-name="T1"> </text:span><text:span text:style-name="T2">(59/9) </text:span> [ ]ⲱ ⲉⲧⲟⲩⲉⲓ <text:line-break/><text:span text:style-name="T1"> </text:span><text:span text:style-name="T2">(59/10) </text:span> [.......] ϩⲓ [...]ⲉⲉⲩ <text:line-break/><text:span text:style-name="T1"> </text:span><text:span text:style-name="T2">(59/11) </text:span> [.......]ⲓ̣ⲟ.[.]ⲉⲩϣⲟ[ⲟⲡ’] <text:line-break/><text:span text:style-name="T1"> </text:span><text:span text:style-name="T2">(59/12) </text:span> [......]ⲁⲩ ⲁⲩⲱ ⲛⲉⲩⲛϩⲣⲁⲓ̈ <text:line-break/><text:span text:style-name="T1"> </text:span><text:span text:style-name="T2">(59/13) </text:span> [ⲛϩⲏⲧ]ⲟ̣ⲩ ⲁⲛ ϩⲓⲛⲁ ϫⲉ ⲉⲩⲉ‐ <text:line-break/><text:span text:style-name="T1"> </text:span><text:span text:style-name="T2">(59/14) </text:span> [ϣⲱ]ⲡⲉ ⲛ ϩⲁⲡⲗⲟⲩⲛ· ⲁⲩⲱ <text:line-break/><text:span text:style-name="T1"> </text:span><text:span text:style-name="T2">(59/15) </text:span> [ⲛⲥⲉ]ϣ̣ⲧⲙϣⲱⲡⲉ ⲉⲩⲕⲏⲃ <text:line-break/><text:span text:style-name="T1"> </text:span><text:span text:style-name="T2">(59/16) </text:span> [ⲕⲁⲧ]ⲁ̣ ⲗⲁⲁⲩ ⲛ ⲥⲙⲟⲧ’· ⲁⲩⲱ̣ <text:line-break/><text:span text:style-name="T1"> </text:span><text:span text:style-name="T2">(59/17) </text:span> [ⲛⲁⲓ̈]ⲙ̣ⲉⲛ ⲛⲉ ⲛⲓⲕⲁⲧⲁ ⲟⲩⲁ ⲛ <text:line-break/><text:span text:style-name="T1"> </text:span><text:span text:style-name="T2">(59/18) </text:span> [ϩⲁⲡ]ⲗⲟⲩⲛ ⲁⲩⲱ ⲛ ⲧⲉⲗⲓⲟⲥ· <text:line-break/><text:span text:style-name="T1"> </text:span><text:span text:style-name="T2">(59/19) </text:span> [....]ⲣϥ ⲁⲩⲱ ⲛⲁⲓ̈ ⲧⲏⲣⲟⲩ <text:line-break/><text:span text:style-name="T1"> </text:span><text:span text:style-name="T2">(59/20) </text:span> [..ⲉ]ⲱⲛ ⲛⲧⲉ ⲛⲓⲉⲱⲛ ⲉⲩ‐ <text:line-break/><text:span text:style-name="T1"> </text:span><text:span text:style-name="T2">(59/21) </text:span> [...]ⲕ ⲙⲙⲟϥ· ⲛⲁⲓ̈ ⲧⲏⲣⲟⲩ <text:line-break/><text:span text:style-name="T1"> </text:span><text:span text:style-name="T2">(59/22) </text:span> [.. ⲉ]ⲧ’ϣⲟⲟⲡ’ ϩⲓ ⲟⲩⲙⲁ <text:line-break/><text:span text:style-name="T1"> </text:span><text:span text:style-name="T2">(59/23) </text:span> [.. ⲡ]ⲁⲛⲧⲉⲗⲓⲟⲛ· ⲡⲁⲟⲩⲛⲟϭ <text:line-break/><text:span text:style-name="T1"> </text:span><text:span text:style-name="T2">(59/24) </text:span> [...]ⲙ ⲡⲉ ⲉ ⲛⲁⲩ ⲉⲣⲟⲟⲩ <text:line-break/><text:span text:style-name="T1"> </text:span><text:span text:style-name="T2">(59/25) </text:span> [...]ⲧⲛⲁⲩ ⲅⲁⲣ ⲉⲣⲟϥ ⲙ <text:line-break/><text:span text:style-name="T1"> </text:span><text:span text:style-name="T2">(60/1) </text:span> ⲡⲣ[ <text:line-break/><text:span text:style-name="T1"> </text:span><text:span text:style-name="T2">(60/2) </text:span> ⲟⲩ[ <text:line-break/><text:span text:style-name="T1"> </text:span><text:span text:style-name="T2">(60/3) </text:span> ⲙⲟ[ <text:line-break/><text:span text:style-name="T1"> </text:span><text:span text:style-name="T2">(60/4) </text:span> ⲧⲉ̣ⲗ̣ⲓⲟ̣[ⲥ <text:line-break/><text:span text:style-name="T1"> </text:span><text:span text:style-name="T2">(60/5) </text:span> [..]ϯϩ[ <text:line-break/><text:span text:style-name="T1"> </text:span><text:span text:style-name="T2">(60/6) </text:span> [.].ⲟⲩⲱ[ <text:line-break/><text:span text:style-name="T1"> </text:span><text:span text:style-name="T2">(60/7) </text:span> [..]ⲙ ⲛⲓⲙ [ <text:line-break/><text:span text:style-name="T1"> </text:span><text:span text:style-name="T2">(60/8) </text:span> ϣⲟⲟⲡ’ ⲟ[ <text:line-break/><text:span text:style-name="T1"> </text:span><text:span text:style-name="T2">(60/9) </text:span> ⲁⲣ ⲡⲉ ⲉⲛⲉ̣[ <text:line-break/><text:span text:style-name="T1"> </text:span><text:span text:style-name="T2">(60/10) </text:span> [..ⲥ]ⲱⲧⲛ [ⲉⲣ]ⲟϥ ϩ̣[ <text:line-break/><text:span text:style-name="T1"> </text:span><text:span text:style-name="T2">(60/11) </text:span> [...]ⲗ ⲁⲩⲱ [.].ⲩ[ <text:line-break/><text:span text:style-name="T1"> </text:span><text:span text:style-name="T2">(60/12) </text:span> ⲛϩⲣⲁⲓ̈ ϩⲛ ⲟⲩⲉⲛⲛⲟ̣[ⲓⲁ <text:line-break/><text:span text:style-name="T1"> </text:span><text:span text:style-name="T2">(60/13) </text:span> ⲟⲩϣⲟⲣⲡ’ ⲛ ⲉⲛⲛⲟⲓ̣[ⲁ <text:line-break/><text:span text:style-name="T1"> </text:span><text:span text:style-name="T2">(60/14) </text:span> ⲉⲡⲓⲇⲏ ϩⲛ ⲟⲩϭⲟⲙ ⲁⲩ[ <text:line-break/><text:span text:style-name="T1"> </text:span><text:span text:style-name="T2">(60/15) </text:span> ⲛⲩⲧⲉⲗⲓⲟⲥ ⲧⲉ· ⲁ[ <text:line-break/><text:span text:style-name="T1"> </text:span><text:span text:style-name="T2">(60/16) </text:span> ϣϣⲉ ⲉⲣⲟⲕ ⲉ ⲧⲁϣ[ <text:line-break/><text:span text:style-name="T1"> </text:span><text:span text:style-name="T2">(60/17) </text:span> ⲉⲧⲃⲉ ϩⲱⲃ ⲛⲓⲙ· ⲁⲩⲱ̣[ <text:line-break/><text:soft-page-break/><text:span text:style-name="T1"> </text:span><text:span text:style-name="T2">(60/18) </text:span> ⲛⲏ ⲉⲧⲕⲛⲁⲥⲱⲧⲙ ⲉ̣[ⲣⲟⲟⲩ] <text:line-break/><text:span text:style-name="T1"> </text:span><text:span text:style-name="T2">(60/19) </text:span> ⲉⲃⲟⲗ ϩⲓⲧⲛ ⲟⲩⲉⲛⲛ̣[ⲟⲓⲁ] <text:line-break/><text:span text:style-name="T1"> </text:span><text:span text:style-name="T2">(60/20) </text:span> ⲛⲧⲉ ⲛⲏ ⲉⲧ’ϫⲟⲥⲉ ⲉ ⲧ̣[ⲉⲗⲓ]‐ <text:line-break/><text:span text:style-name="T1"> </text:span><text:span text:style-name="T2">(60/21) </text:span> ⲟⲥ ⲁⲩⲱ ⲙⲛ ⲛⲉⲧⲕⲛ̣[ⲁⲥⲟⲩ]‐ <text:line-break/><text:span text:style-name="T1"> </text:span><text:span text:style-name="T2">(60/22) </text:span> ⲱⲛⲟⲩ ϩⲛ ⲟⲩⲯⲩⲭⲏ̣ [ⲛⲧⲉ] <text:line-break/><text:span text:style-name="T1"> </text:span><text:span text:style-name="T2">(60/23) </text:span> ⲛⲓⲧⲉⲗⲓⲟⲥ· ʹ264ʹ264 ⲁⲩⲱ̣ [ⲉ] <text:line-break/><text:span text:style-name="T1"> </text:span><text:span text:style-name="T2">(60/24) </text:span> ⲧⲁⲥ ϫⲉ ⲛⲁⲓ̈ ⲁⲥϯ ⲱⲙ[ⲥ <text:line-break/><text:span text:style-name="T1"> </text:span><text:span text:style-name="T2">(61/1) </text:span> [ ]ⲛ̣ϩ <text:line-break/><text:span text:style-name="T1"> </text:span><text:span text:style-name="T2">(61/2) </text:span> [ ] ⲛ <text:line-break/><text:span text:style-name="T1"> </text:span><text:span text:style-name="T2">(61/3) </text:span> [ ].ⲧⲉ <text:line-break/><text:span text:style-name="T1"> </text:span><text:span text:style-name="T2">(61/4) </text:span> [ ] ⲛ ⲛ[ <text:line-break/><text:span text:style-name="T1"> </text:span><text:span text:style-name="T2">(61/5) </text:span> [ ]ⲱ ⲛ ⲛ [ <text:line-break/><text:span text:style-name="T1"> </text:span><text:span text:style-name="T2">(61/6) </text:span> [ ]ⲟⲥ ⲛ ⲛ̣[ <text:line-break/><text:span text:style-name="T1"> </text:span><text:span text:style-name="T2">(61/7) </text:span> [........].[..] ⲡⲓϣⲟⲣⲡ’̣ <text:line-break/><text:span text:style-name="T1"> </text:span><text:span text:style-name="T2">(61/8) </text:span> [.........]ⲩ̣ⲱ ⲁⲉⲓϫⲓ ϭⲟⲙ <text:line-break/><text:span text:style-name="T1"> </text:span><text:span text:style-name="T2">(61/9) </text:span> [......]ⲩ̣ⲱ ⲁ̣[.]ⲟⲩⲱ̣[..] <text:line-break/><text:span text:style-name="T1"> </text:span><text:span text:style-name="T2">(61/10) </text:span> [........]ⲱ ⲁ[ⲉⲓ]ϫⲓ ⲙⲟⲣⲫⲏ̣ <text:line-break/><text:span text:style-name="T1"> </text:span><text:span text:style-name="T2">(61/11) </text:span> [.....].ⲉ· ⲁⲩⲱ ⲁⲉⲓϫⲓ ⲟⲩⲟ‐ <text:line-break/><text:span text:style-name="T1"> </text:span><text:span text:style-name="T2">(61/12) </text:span> [....]ϥ̣ϣⲟⲟⲡ’ ϩⲓϫⲙ ⲡⲁϣⲁ‐ <text:line-break/><text:span text:style-name="T1"> </text:span><text:span text:style-name="T2">(61/13) </text:span> [....]ϫ̣ⲓ ⲟⲩⲡ̅ⲛ̅ⲁ̅ ⲉϥⲧⲟⲩⲃⲏ[ⲩ] <text:line-break/><text:span text:style-name="T1"> </text:span><text:span text:style-name="T2">(61/14) </text:span> [ⲁⲉⲓ]ϣ̣ⲱⲡⲉ ⲉⲓ̈ϣⲟⲟⲡ’ ⲟⲛ‐ <text:line-break/><text:span text:style-name="T1"> </text:span><text:span text:style-name="T2">(61/15) </text:span> [ⲧⲱⲥ] ⲁⲩⲱ ⲧⲟⲧⲉ ⲁⲥⲛⲧ’ <text:line-break/><text:span text:style-name="T1"> </text:span><text:span text:style-name="T2">(61/16) </text:span> [ⲉϩ]ⲟ̣ⲩⲛ ⲉ ⲡⲓⲛⲟϭ ⲛⲛ ⲉ‐ <text:line-break/><text:span text:style-name="T1"> </text:span><text:span text:style-name="T2">(61/17) </text:span> [ⲱⲛ] ⲡⲓⲙⲁ ⲉⲧⲉ ⲡⲓϣⲙⲧ’‐ <text:line-break/><text:span text:style-name="T1"> </text:span><text:span text:style-name="T2">(61/18) </text:span> [ϩⲟⲟ]ⲩⲧ’ ⲛ ⲧⲉⲗⲓⲟⲥ ⲙ‐ <text:line-break/><text:span text:style-name="T1"> </text:span><text:span text:style-name="T2">(61/19) </text:span> [ⲙⲁⲩ]· ⲁⲩⲱ ⲁⲉⲓⲛⲁⲩ ⲉ <text:line-break/><text:span text:style-name="T1"> </text:span><text:span text:style-name="T2">(61/20) </text:span> [ⲡⲁ]ⲗⲟⲩ ⲛⲛ ⲁⲧⲛⲁⲩ ⲉⲣⲟϥ <text:line-break/><text:span text:style-name="T1"> </text:span><text:span text:style-name="T2">(61/21) </text:span> [ϩⲣⲁ]ⲓ̣̈ ϩⲛ ⲟⲩ〈ⲟⲩ〉ⲟⲉⲓⲛ ⲛⲛ ⲁⲧ‐ <text:line-break/><text:span text:style-name="T1"> </text:span><text:span text:style-name="T2">(61/22) </text:span> [ⲛⲁ]ⲩ̣ ⲉⲣⲟϥ· ⲧⲟⲧⲉ ⲟⲛ <text:line-break/><text:span text:style-name="T1"> </text:span><text:span text:style-name="T2">(61/23) </text:span> [ⲁⲥ]ϯ ⲱⲙⲥ ⲛⲁⲓ̈ ⲛϩⲣⲁⲓ̈ ϩⲛ <text:line-break/><text:span text:style-name="T1"> </text:span><text:span text:style-name="T2">(62/1) </text:span> ⲉ̣ⲩ[ <text:line-break/><text:span text:style-name="T1"> </text:span><text:span text:style-name="T2">(62/2) </text:span> ⲉⲧ̣[ <text:line-break/><text:span text:style-name="T1"> </text:span><text:span text:style-name="T2">(62/3) </text:span> ϫⲟⲟ[ <text:line-break/><text:span text:style-name="T1"> </text:span><text:span text:style-name="T2">(62/4) </text:span> [..]ϭⲟ̣[ <text:line-break/><text:span text:style-name="T1"> </text:span><text:span text:style-name="T2">(62/5) </text:span> [..] ⲡⲉⲥⲥ.[........ <text:line-break/><text:span text:style-name="T1"> </text:span><text:span text:style-name="T2">(62/6) </text:span> [ⲙ]ⲙ̣ⲟϥ ⲡⲉ̣[........ <text:line-break/><text:span text:style-name="T1"> </text:span><text:span text:style-name="T2">(62/7) </text:span> [ⲁⲩ]ⲱ ⲁⲉⲓ.[ <text:line-break/><text:span text:style-name="T1"> </text:span><text:span text:style-name="T2">(62/8) </text:span> [ⲁ]ⲉⲓϭⲙ ϭⲟⲙ ⲉ ⲛ[...... <text:line-break/><text:span text:style-name="T1"> </text:span><text:span text:style-name="T2">(62/9) </text:span> [..]. ⲛⲓⲛⲟϭ ⲛⲛ ⲁ.[.... <text:line-break/><text:span text:style-name="T1"> </text:span><text:span text:style-name="T2">(62/10) </text:span> [.. ⲁ]ⲩⲱ ⲛ [ⲧ]ⲉⲗⲓⲟ̣[ⲥ.... <text:line-break/><text:span text:style-name="T1"> </text:span><text:span text:style-name="T2">(62/11) </text:span> ⲡ̣ⲉϫⲁⲥ ⲛⲁⲓ̈ ⲛϭⲓ ⲧⲁⲛ[ⲓⲉⲟⲟⲩ] <text:line-break/><text:span text:style-name="T1"> </text:span><text:span text:style-name="T2">(62/12) </text:span> ⲧⲏⲣⲟⲩ ⲓ̈ⲱ̅ⲏ̅ⲗ̅ ϫⲉ ⲛⲓϫ[ⲱⲕⲙ] <text:line-break/><text:span text:style-name="T1"> </text:span><text:span text:style-name="T2">(62/13) </text:span> ⲧⲏⲣⲟⲩ ⲉⲧⲥⲙⲡϣⲁ ⲛ̣ [ϫⲓ] <text:line-break/><text:span text:style-name="T1"> </text:span><text:span text:style-name="T2">(62/14) </text:span> ⲱⲙⲥ ⲛϩⲏⲧⲟⲩ ⲁⲕϫ[ⲓⲧⲟⲩ] <text:line-break/><text:span text:style-name="T1"> </text:span><text:span text:style-name="T2">(62/15) </text:span> [ⲁ]ⲩⲱ ⲁⲕϣⲱⲡⲉ ⲛ ⲧⲉ[ⲗⲓⲟⲥ <text:line-break/><text:span text:style-name="T1"> </text:span><text:span text:style-name="T2">(62/16) </text:span> [.].ⲟⲥ ⲡⲓⲥⲱⲧⲙ ⲛⲧⲉ̣[.... <text:line-break/><text:span text:style-name="T1"> </text:span><text:span text:style-name="T2">(62/17) </text:span> ⲧ̣ⲏⲣⲟⲩ· ϯⲛⲟⲩ ϭⲉ ⲙⲟ[ⲩⲧⲉ] <text:line-break/><text:soft-page-break/><text:span text:style-name="T1"> </text:span><text:span text:style-name="T2">(62/18) </text:span> ⲟⲩⲉ ⲥ̅ⲁ̅ⲗ̅ⲁ̅ⲙ̅ⲉ̅ⲝ̅ ⲙⲛ .[ <text:line-break/><text:span text:style-name="T1"> </text:span><text:span text:style-name="T2">(62/19) </text:span> ⲙⲛ ϯⲡⲁⲛⲧⲉⲗⲓⲟⲥ ⲁⲣ̅.[ <text:line-break/><text:span text:style-name="T1"> </text:span><text:span text:style-name="T2">(62/20) </text:span> ⲛⲓⲫⲱⲥⲧⲏⲣ ⲛⲧⲉ ⲡⲓⲁⲓ[ⲱⲛ] <text:line-break/><text:span text:style-name="T1"> </text:span><text:span text:style-name="T2">(62/21) </text:span> ⲛ ⲃ̅ⲁ̅ⲣ̅ⲃ̅ⲏ̅ⲗ̅ⲱ̅ ⲙⲛ ϯⲅⲛⲱ̣[ⲥⲓⲥ] <text:line-break/><text:span text:style-name="T1"> </text:span><text:span text:style-name="T2">(62/22) </text:span> ⲛ ⲁⲧ’ϯ ϣⲓ ⲉⲣⲟⲥ· ⲁⲩⲱ̣ [ⲛⲏ] <text:line-break/><text:span text:style-name="T1"> </text:span><text:span text:style-name="T2">(62/23) </text:span> ⲉⲧⲙⲙⲁⲩ ⲥⲉⲛⲁϭⲱⲗⲡ [ⲉⲃⲟⲗ] <text:line-break/><text:span text:style-name="T1"> </text:span><text:span text:style-name="T2">(63/1) </text:span> [ ]ⲁ̣ⲧⲛⲁⲩ <text:line-break/><text:span text:style-name="T1"> </text:span><text:span text:style-name="T2">(63/2) </text:span> [ ].ⲏⲥⲡ[ <text:line-break/><text:span text:style-name="T1"> </text:span><text:span text:style-name="T2">(63/3) </text:span> [ ]ⲟⲩ[ <text:line-break/><text:span text:style-name="T1"> </text:span><text:span text:style-name="T2">(63/4) </text:span> [ ]ⲉⲁⲩ[ <text:line-break/><text:span text:style-name="T1"> </text:span><text:span text:style-name="T2">(63/5) </text:span> [ ].ⲉⲧ.[ <text:line-break/><text:span text:style-name="T1"> </text:span><text:span text:style-name="T2">(63/6) </text:span> [.......ⲃ]ⲁ̅ⲣ̅ⲃ̅ⲏ̅ⲗ̅ⲱ̅ ⲙ ⲡⲁⲣ̣[ⲑⲉ]‐ <text:line-break/><text:span text:style-name="T1"> </text:span><text:span text:style-name="T2">(63/7) </text:span> [ⲛⲟⲥ ⲁⲩⲱ] ⲡⲓⲁⲧⲛⲁⲩ ⲉⲣⲟϥ <text:line-break/><text:span text:style-name="T1"> </text:span><text:span text:style-name="T2">(63/8) </text:span> [ⲛ ϣⲙⲧ’ϭ]ⲟ̣ⲙ ⲙ ⲡ̅ⲛ̅ⲁ̅· ⲛ̣[ⲁⲓ̈] <text:line-break/><text:span text:style-name="T1"> </text:span><text:span text:style-name="T2">(63/9) </text:span> [ⲉⲧⲧⲁⲥϫⲟ]ⲟⲩ ⲛⲁⲓ̈ ⲛϭⲓ ⲧⲁ[ⲛⲓⲉ]‐ <text:line-break/><text:span text:style-name="T1"> </text:span><text:span text:style-name="T2">(63/10) </text:span> [ⲟⲟⲩ] ⲧ̣ⲏⲣⲟⲩ ⲓ̈ⲟ̅ⲩ̅ⲏ̅ⲗ̅ ⲁⲥⲕⲁ‐ <text:line-break/><text:span text:style-name="T1"> </text:span><text:span text:style-name="T2">(63/11) </text:span> [ⲁⲧ’ ⲁ]ⲩⲱ ⲁⲥⲃⲱⲕ ⲁⲥⲁϩⲉⲣⲁ‐ <text:line-break/><text:span text:style-name="T1"> </text:span><text:span text:style-name="T2">(63/12) </text:span> [ⲧⲥ ⲛ]ⲛⲁϩⲣⲁϥ ⲙ ⲡⲓⲡⲣⲱⲧⲟ‐ <text:line-break/><text:span text:style-name="T1"> </text:span><text:span text:style-name="T2">(63/13) </text:span> [ⲫⲁⲛ]ⲏ̣ⲥ· ⲧⲟⲧⲉ ⲁⲛⲟⲕ ⲛⲉⲓ̈‐ <text:line-break/><text:span text:style-name="T1"> </text:span><text:span text:style-name="T2">(63/14) </text:span> [ⲁϩⲉⲣ]ⲁ̣ⲧ’ ⲛϩⲣⲁⲓ̈ ϩⲓϫⲙ ⲡⲁⲡ̅ⲛ̅[̅ⲁ̅] <text:line-break/><text:span text:style-name="T1"> </text:span><text:span text:style-name="T2">(63/15) </text:span> [ⲉⲉⲓ]ⲧⲱⲃϩ ⲉⲙⲁⲧⲉ ⲛ ⲛⲓⲛⲟϭ <text:line-break/><text:span text:style-name="T1"> </text:span><text:span text:style-name="T2">(63/16) </text:span> [ⲙ ⲫ]ⲱⲥⲧⲏⲣ ⲛϩⲣⲁⲓ̈ ϩⲛ ⲟⲩ‐ <text:line-break/><text:span text:style-name="T1"> </text:span><text:span text:style-name="T2">(63/17) </text:span> [ⲉⲛⲛ]ⲟ̣ⲓⲁ· ⲛⲉⲓⲙⲟⲩⲧⲉ <text:line-break/><text:span text:style-name="T1"> </text:span><text:span text:style-name="T2">(63/18) </text:span> [ⲟⲩ]ⲃ̣ⲉ ⲥ̅ⲁ̅ⲗ̅ⲁ̅ⲙ̅ⲉ̅ⲝ̅ ⲙⲛ ⲥⲉ‐ <text:line-break/><text:span text:style-name="T1"> </text:span><text:span text:style-name="T2">(63/19) </text:span> [..]ⲉⲛ ⲙⲛ ϯⲡⲁⲛⲧⲉⲗⲓⲟⲥ <text:line-break/><text:span text:style-name="T1"> </text:span><text:span text:style-name="T2">(63/20) </text:span> [..].̅ⲏ̅· ⲁⲩⲱ ⲁⲓ̈ⲛⲁⲩ ⲉ ϩⲉⲛ‐ <text:line-break/><text:span text:style-name="T1"> </text:span><text:span text:style-name="T2">(63/21) </text:span> [ⲉⲟ]ⲟⲩ ⲉⲛⲉⲁⲩ ⲉ ϩⲉⲛϭⲟⲙ <text:line-break/><text:span text:style-name="T1"> </text:span><text:span text:style-name="T2">(63/22) </text:span> [ⲁⲩ]ⲱ ⲁⲩϫⲱϩ ⲉⲣⲟⲉⲓ· ⲁⲓ̈ϭⲙ ϭⲟⲙ <text:line-break/><text:span text:style-name="T1"> </text:span><text:span text:style-name="T2">(64/1) </text:span> ⲁ.[ <text:line-break/><text:span text:style-name="T1"> </text:span><text:span text:style-name="T2">(64/2) </text:span> ϩⲙ ⲡⲁ[ <text:line-break/><text:span text:style-name="T1"> </text:span><text:span text:style-name="T2">(64/3) </text:span> [ⲁ]ⲩⲱ .[ <text:line-break/><text:span text:style-name="T1"> </text:span><text:span text:style-name="T2">(64/4) </text:span> [.]ϯⲡⲁ.[ <text:line-break/><text:span text:style-name="T1"> </text:span><text:span text:style-name="T2">(64/5) </text:span> [.]ⲟ̣ⲟⲩⲧ[...].[ <text:line-break/><text:span text:style-name="T1"> </text:span><text:span text:style-name="T2">(64/6) </text:span> [ⲁ]ⲥϩⲱⲃⲥ ⲉⲃⲟⲗ̣ [ <text:line-break/><text:span text:style-name="T1"> </text:span><text:span text:style-name="T2">(64/7) </text:span> {ⲟⲩ} ⲧⲏⲣⲟⲩ· [ <text:line-break/><text:span text:style-name="T1"> </text:span><text:span text:style-name="T2">(64/8) </text:span> [.]ⲥ̣̅̅ⲁ̅ⲗ̅ⲁ̅ⲙ̅ⲉ̅ⲝ̅ ⲙ[ⲛ ⲥ̅ⲉⲗ̅ <text:line-break/><text:span text:style-name="T1"> </text:span><text:span text:style-name="T2">(64/9) </text:span> [ⲛ]ⲏ̣ ⲉⲧⲁⲩϭⲱⲗⲡ̣ [ⲛⲁⲓ̈ ⲉⲃⲟⲗ] <text:line-break/><text:span text:style-name="T1"> </text:span><text:span text:style-name="T2">(64/10) </text:span> ⲛ ϩⲱⲃ ⲛⲓⲙ ⲉⲩϫⲱ ⲙ̣[ⲙⲟⲥ] <text:line-break/><text:span text:style-name="T1"> </text:span><text:span text:style-name="T2">(64/11) </text:span> ϫⲉ ⲍ̅ⲱ̅ⲥ̅ⲧ̅ⲣ̅ⲓ̅ⲁ̅ⲛ̅ⲉ̅ ⲥ̣[ⲱⲧⲙ] <text:line-break/><text:span text:style-name="T1"> </text:span><text:span text:style-name="T2">(64/12) </text:span> ⲉⲧⲃⲉ ⲛⲏ ⲉⲧⲕⲱⲧ̣[ⲉ ⲛ]‐ <text:line-break/><text:span text:style-name="T1"> </text:span><text:span text:style-name="T2">(64/13) </text:span> §ⲥⲱⲟⲩ·ʹ264ʹ264ʹ264 ⲛⲉⲟⲩ[ <text:line-break/><text:span text:style-name="T1"> </text:span><text:span text:style-name="T2">(64/14) </text:span> ⲁⲩⲱ ⲟⲩⲁ ⲟⲩⲱⲧ’ ⲡ[ <text:line-break/><text:span text:style-name="T1"> </text:span><text:span text:style-name="T2">(64/15) </text:span> ϣⲟⲟⲡ’ ϩⲁⲑⲏ ⲛ ⲛⲁⲓ̈ ⲧ[ⲏⲣⲟⲩ] <text:line-break/><text:span text:style-name="T1"> </text:span><text:span text:style-name="T2">(64/16) </text:span> ⲉⲧ’ϣⲟⲟⲡ’ ⲟⲛⲧⲱⲥ̣ [ϩⲙ ⲡⲓ]‐ <text:line-break/><text:span text:style-name="T1"> </text:span><text:span text:style-name="T2">(64/17) </text:span> ⲡⲛ̅ⲁ̅ ⲛ ⲁⲧ’ϣⲓ ⲉⲣ[ⲟϥ] <text:line-break/><text:span text:style-name="T1"> </text:span><text:span text:style-name="T2">(64/18) </text:span> ⲁⲩⲱ ⲛ ⲁⲧ’ⲡⲱⲣϫ ⲛ [. <text:line-break/><text:span text:style-name="T1"> </text:span><text:span text:style-name="T2">(64/19) </text:span> ⲟⲩⲁ ⲙ ⲡⲧⲏⲣϥ ⲉⲧ’[ϣⲟ]‐ <text:line-break/><text:soft-page-break/><text:span text:style-name="T1"> </text:span><text:span text:style-name="T2">(64/20) </text:span> ⲟⲡ’ ⲛϩⲏⲧϥ ⲙⲛ ⲡⲓ.[ <text:line-break/><text:span text:style-name="T1"> </text:span><text:span text:style-name="T2">(64/21) </text:span> ⲙⲙⲟϥ ⲙⲛ ⲡⲏ ⲉⲧ’ⲙ[ <text:line-break/><text:span text:style-name="T1"> </text:span><text:span text:style-name="T2">(64/22) </text:span> ⲛⲥⲱϥ· ⲉⲛⲧⲟϥ ⲙⲁⲩ̣[ⲁⲁϥ <text:line-break/><text:span text:style-name="T1"> </text:span><text:span text:style-name="T2">(64/23) </text:span> ⲉⲧ’ϫⲓⲟⲟⲣ ⲙⲙⲟϥ ⲛ [ <text:line-break/><text:span text:style-name="T1"> </text:span><text:span text:style-name="T2">(65/1) </text:span> [..]ⲧ̣ϥ [..]ⲁⲧ[....... <text:line-break/><text:span text:style-name="T1"> </text:span><text:span text:style-name="T2">(65/2) </text:span> [..]ⲛ̣[.]ⲁ ⲛ ⲁⲧ’[......]ⲁⲧ‐ <text:line-break/><text:span text:style-name="T1"> </text:span><text:span text:style-name="T2">(65/3) </text:span> [....].ⲁ̣ⲧ’ⲟ̣[....] ⲛ ⲁⲧ’‐ <text:line-break/><text:span text:style-name="T1"> </text:span><text:span text:style-name="T2">(65/4) </text:span> [....]ⲏ̣ⲛⲁⲩ̣[...]ⲟ̣ⲩ· . <text:line-break/><text:span text:style-name="T1"> </text:span><text:span text:style-name="T2">(65/5) </text:span> [......].[.. ⲛ]ⲁ̣ⲓ̈ ⲧⲏⲣ[ⲟⲩ] <text:line-break/><text:span text:style-name="T1"> </text:span><text:span text:style-name="T2">(65/6) </text:span> [.........]ⲁⲣ[.]ⲏ ⲡⲉ ⲛ̣ [. <text:line-break/><text:span text:style-name="T1"> </text:span><text:span text:style-name="T2">(65/7) </text:span> [....... ⲟ]ⲩϣⲟⲣⲡ’ ⲛ.[ <text:line-break/><text:span text:style-name="T1"> </text:span><text:span text:style-name="T2">(65/8) </text:span> [...... ⲛ]ⲧ̣ⲉ ⲉⲛⲛⲟⲓⲁ ⲛⲓ[ⲙ] <text:line-break/><text:span text:style-name="T1"> </text:span><text:span text:style-name="T2">(65/9) </text:span> [......]ⲉ ⲛⲧⲉ ϭⲟⲙ ⲛⲓ̣[ⲙ] <text:line-break/><text:span text:style-name="T1"> </text:span><text:span text:style-name="T2">(65/10) </text:span> [......] ⲉϩⲟⲩⲛ ⲉ ⲡⲉ[ⲥⲏⲧ] <text:line-break/><text:span text:style-name="T1"> </text:span><text:span text:style-name="T2">(65/11) </text:span> [...] ⲉϥⲥⲉⲙⲛⲏⲩ ⲉϩⲟⲩⲛ <text:line-break/><text:span text:style-name="T1"> </text:span><text:span text:style-name="T2">(65/12) </text:span> [...]ⲥ̣ⲁ̣ϩⲉⲣⲁⲧϥ· ⲉϥⲟⲩⲟ‐ <text:line-break/><text:span text:style-name="T1"> </text:span><text:span text:style-name="T2">(65/13) </text:span> [ⲧⲃ ⲉ]ϩⲟⲩⲛ ⲉ ⲡⲓⲉⲓ ⲉⲩⲙⲁ <text:line-break/><text:span text:style-name="T1"> </text:span><text:span text:style-name="T2">(65/14) </text:span> [...] ⲙⲛ ⲟⲩⲁⲧⲛ ⲁⲣⲏϫϥ <text:line-break/><text:span text:style-name="T1"> </text:span><text:span text:style-name="T2">(65/15) </text:span> [ⲁⲩ]ⲱ̣ ⲉϥϫⲟⲥⲉ ⲉϩⲟⲩⲉ ⲁ‐ <text:line-break/><text:span text:style-name="T1"> </text:span><text:span text:style-name="T2">(65/16) </text:span> [ⲧⲛ] ⲣⲁⲧϥ ⲛⲓⲙ· ⲁⲩⲱ ⲉϥϯ <text:line-break/><text:span text:style-name="T1"> </text:span><text:span text:style-name="T2">(65/17) </text:span> [...] ⲉⲛⲉⲁϥ ⲉ ⲥⲱⲙⲁ ⲛⲓⲙ <text:line-break/><text:span text:style-name="T1"> </text:span><text:span text:style-name="T2">(65/18) </text:span> [ⲉ]ϥⲧⲟⲩⲃⲏⲩ ⲉ ⲁⲧⲥⲱⲙⲁ <text:line-break/><text:span text:style-name="T1"> </text:span><text:span text:style-name="T2">(65/19) </text:span> [ⲛⲓ]ⲙ· ⲉϥⲛⲁ ⲉϩⲟⲩⲛ ⲉ ⲉⲛ‐ <text:line-break/><text:span text:style-name="T1"> </text:span><text:span text:style-name="T2">(65/20) </text:span> [ⲛⲟⲓ]ⲁ ⲛⲓⲙ ⲙⲛ ⲥⲱⲙⲁ ⲛⲓⲙ <text:line-break/><text:span text:style-name="T1"> </text:span><text:span text:style-name="T2">(65/21) </text:span> [ⲉϥ]ⲉ ⲛ ϭⲟⲙ ⲉ ⲛⲁⲓ̈ ⲧⲏⲣⲟⲩ <text:line-break/><text:span text:style-name="T1"> </text:span><text:span text:style-name="T2">(65/22) </text:span> [ⲅⲉⲛ]ⲟⲥ ⲛⲓⲙ ⲙⲛ ⲉⲓⲇⲟⲥ <text:line-break/><text:span text:style-name="T1"> </text:span><text:span text:style-name="T2">(65/23) </text:span> [ⲛⲓⲙ] ⲉⲩⲡⲧⲏⲣϥ ⲛⲧⲁⲩ ⲡⲉ <text:line-break/><text:span text:style-name="T1"> </text:span><text:span text:style-name="T2">(66/1) </text:span> [.........]ϣⲟ̣ⲟⲡ’ <text:line-break/><text:span text:style-name="T1"> </text:span><text:span text:style-name="T2">(66/2) </text:span> ⲁ̣ⲩ[......]ⲟ̣ⲟⲡ’ ⲟⲛ̣[.. <text:line-break/><text:span text:style-name="T1"> </text:span><text:span text:style-name="T2">(66/3) </text:span> ⲛ ⲧ[......].ⲧⲏⲣ[.... <text:line-break/><text:span text:style-name="T1"> </text:span><text:span text:style-name="T2">(66/4) </text:span> [.]ⲩ̣ⲁⲣⲉ[....]ⲣϥ· ⲡⲓ̣[... <text:line-break/><text:span text:style-name="T1"> </text:span><text:span text:style-name="T2">(66/5) </text:span> [..]ⲕⲟⲛ .[...]ⲩⲱ̣ ⲛ ⲛ[... <text:line-break/><text:span text:style-name="T1"> </text:span><text:span text:style-name="T2">(66/6) </text:span> ⲁ̣· ⲉⲩⲙⲉⲣⲓⲕ[ⲟⲛ .... <text:line-break/><text:span text:style-name="T1"> </text:span><text:span text:style-name="T2">(66/7) </text:span> [..]ⲙ̣ⲉⲣⲟⲥ ⲧⲏⲣ[....... <text:line-break/><text:span text:style-name="T1"> </text:span><text:span text:style-name="T2">(66/8) </text:span> [.]ⲡ’̣ ⲛϩⲣⲁⲓ̈ ϩⲛ ⲟⲩ[...... <text:line-break/><text:span text:style-name="T1"> </text:span><text:span text:style-name="T2">(66/9) </text:span> ⲥⲟⲩⲱⲛⲥ ⲉⲥ.[....... <text:line-break/><text:span text:style-name="T1"> </text:span><text:span text:style-name="T2">(66/10) </text:span> [..]ⲩⲉ ⲉⲃⲟⲗ ⲙⲙ[ⲟϥ ⲡⲉ] <text:line-break/><text:span text:style-name="T1"> </text:span><text:span text:style-name="T2">(66/11) </text:span> [..].ⲟⲩ ⲉⲧ’ϣⲟ̣[ⲟⲡ’ ⲟⲛ]‐ <text:line-break/><text:span text:style-name="T1"> </text:span><text:span text:style-name="T2">(66/12) </text:span> ⲧⲱⲥ ⲉⲧⲉ ⲉⲃⲟⲗ ⲙⲙⲟϥ̣ [ⲙ] <text:line-break/><text:span text:style-name="T1"> </text:span><text:span text:style-name="T2">(66/13) </text:span> ⲡⲓⲡ̅ⲛ̅ⲁ̅ ⲉⲧ’ϣⲟⲟⲡ’ ⲟⲛ[ⲧⲱⲥ] <text:line-break/><text:span text:style-name="T1"> </text:span><text:span text:style-name="T2">(66/14) </text:span> ⲡⲓⲟⲩⲁ ⲙⲁⲩⲁⲁϥ ⲛ ϣ[.. <text:line-break/><text:span text:style-name="T1"> </text:span><text:span text:style-name="T2">(66/15) </text:span> ϭⲟⲙ ⲅⲁⲣ ⲛⲉ ⲛⲧⲉ ϥ̣[... <text:line-break/><text:span text:style-name="T1"> </text:span><text:span text:style-name="T2">(66/16) </text:span> ⲛⲁⲥ· ϯϩⲩⲡⲁⲣⲝⲓⲥ .[.. <text:line-break/><text:span text:style-name="T1"> </text:span><text:span text:style-name="T2">(66/17) </text:span> ⲡ̣ⲱⲛϩ ⲇⲉ ⲙⲛ ϯⲙⲛⲧ’̣[ⲙⲁ]‐ <text:line-break/><text:span text:style-name="T1"> </text:span><text:span text:style-name="T2">(66/18) </text:span> ⲕⲁⲣⲓⲟⲥ· ⲁⲩⲱ ⲛϩⲣ[ⲁⲓ̈ ϩⲛ] <text:line-break/><text:span text:style-name="T1"> </text:span><text:span text:style-name="T2">(66/19) </text:span> ϯϩⲩⲡⲁⲣⲝⲓⲥ ϥϣⲟⲟⲡ’̣[ <text:line-break/><text:span text:style-name="T1"> </text:span><text:span text:style-name="T2">(66/20) </text:span> ⲟⲩⲁⲡⲉ ⲛ ϩⲁⲡⲗⲟⲩⲛ ⲟⲩ[ϣⲁ]‐ <text:line-break/><text:soft-page-break/><text:span text:style-name="T1"> </text:span><text:span text:style-name="T2">(66/21) </text:span> ϫⲉ ⲛⲧⲁϥ ⲙⲛ ⲟⲩⲉⲓⲇⲟ̣[ⲥ] <text:line-break/><text:span text:style-name="T1"> </text:span><text:span text:style-name="T2">(66/22) </text:span> ⲁⲩⲱ ⲡⲏ ⲉⲧϥⲛⲁϭⲓⲛ[ⲉ ⲙ]‐ <text:line-break/><text:span text:style-name="T1"> </text:span><text:span text:style-name="T2">(66/23) </text:span> ⲙⲁϥ ϣⲁϥⲧⲣⲉϥϣⲱ̣[ⲡⲉ] <text:line-break/><text:span text:style-name="T1"> </text:span><text:span text:style-name="T2">(66/24) </text:span> ⲉϥϣⲟⲟⲡ’ ⲛϩⲣⲁⲓ ⲇ[ⲉ ϩⲛ] <text:line-break/><text:span text:style-name="T1"> </text:span><text:span text:style-name="T2">(66/25) </text:span> ϯⲙⲛⲧ’ⲱⲛϩ ϥⲟⲛϩ ⲁ[ <text:line-break/><text:span text:style-name="T1"> </text:span><text:span text:style-name="T2">(67/1) </text:span> [.....] ⲛ̣[ϩ]ⲣⲁⲓ̈ [ <text:line-break/><text:span text:style-name="T1"> </text:span><text:span text:style-name="T2">(67/2) </text:span> [....]ⲓⲟⲥ ϥϣ.[..] ϫ ⲉⲩⲛ‐ <text:line-break/><text:span text:style-name="T1"> </text:span><text:span text:style-name="T2">(67/3) </text:span> [ⲧⲁϥ ⲙⲙ]ⲁⲩ ⲛ ⲟⲩ ⲙ̣[ⲛ]ⲧ’[ⲉⲓⲙⲉ̣ <text:line-break/><text:span text:style-name="T1"> </text:span><text:span text:style-name="T2">(67/4) </text:span> [.....]ⲙⲙⲉ ⲉ ⲛⲁⲓ̈ ⲧⲏⲣⲟ[ⲩ <text:line-break/><text:span text:style-name="T1"> </text:span><text:span text:style-name="T2">(67/5) </text:span> [....].ⲡⲉ ⲉⲣⲟϥ ⲙⲁⲩⲁⲁ[ϥ <text:line-break/><text:span text:style-name="T1"> </text:span><text:span text:style-name="T2">(67/6) </text:span> [.......] ⲡ̣ⲛⲟⲩⲧⲉ ⲅⲁⲣ [ <text:line-break/><text:span text:style-name="T1"> </text:span><text:span text:style-name="T2">(67/7) </text:span> [.......]ⲁ̣ⲩ ⲉⲓⲙⲏⲧⲓ ⲉ̣[ <text:line-break/><text:span text:style-name="T1"> </text:span><text:span text:style-name="T2">(67/8) </text:span> [...... ⲙ]ⲁ̣ⲩⲁⲁϥ· ⲁⲩⲱ ϥϣ[ <text:line-break/><text:span text:style-name="T1"> </text:span><text:span text:style-name="T2">(67/9) </text:span> [.......] ⲛϩⲣⲁⲓ̈ ⲛϩⲏⲧϥ [ <text:line-break/><text:span text:style-name="T1"> </text:span><text:span text:style-name="T2">(67/10) </text:span> [.......]· ⲡⲓⲟⲩⲱⲧ’ ⲛ̣ [ <text:line-break/><text:span text:style-name="T1"> </text:span><text:span text:style-name="T2">(67/11) </text:span> [.......]ⲁ· ⲉϥϣⲟⲟⲡ’ ⲅⲁⲣ ⲛ [ <text:line-break/><text:span text:style-name="T1"> </text:span><text:span text:style-name="T2">(67/12) </text:span> [ϩⲣⲁⲓ̈ ϩ]ⲙ ⲡⲉⲧⲉ ⲡⲱϥ ⲉⲧ’ϣⲟ‐ <text:line-break/><text:span text:style-name="T1"> </text:span><text:span text:style-name="T2">(67/13) </text:span> [ⲟⲡ’ ⲛ] ⲟ̣ⲩⲉⲓⲇⲉⲁ ⲛⲧⲉ ⲟⲩⲉⲓⲇⲉⲁ̣ <text:line-break/><text:span text:style-name="T1"> </text:span><text:span text:style-name="T2">(67/14) </text:span> [...]ⲧ’ ⲟⲩⲱⲧ’ ⲛⲧⲉ ϯϩⲉⲛ‐ <text:line-break/><text:span text:style-name="T1"> </text:span><text:span text:style-name="T2">(67/15) </text:span> [....] ⲁ̣ⲩⲱ ⲉϥϣⲟⲟⲡ’ ⲙ ⲡ[‐ <text:line-break/><text:span text:style-name="T1"> </text:span><text:span text:style-name="T2">(67/16) </text:span> [....] ⲉϥⲛϩⲣⲁⲓ̈ ⲛϩⲏⲧϥ ϩⲙ <text:line-break/><text:span text:style-name="T1"> </text:span><text:span text:style-name="T2">(67/17) </text:span> [ⲡⲓⲛ]ⲟⲩⲥ ⲁⲩⲱ ϥⲛϩⲣⲁⲓ̈ ⲛϩⲏ̣‐ <text:line-break/><text:span text:style-name="T1"> </text:span><text:span text:style-name="T2">(67/18) </text:span> [ⲧ]ϥ̣ ⲉϥⲛⲛⲏⲩ ⲉⲃⲟⲗ ⲉ ⲗⲁⲁⲩ <text:line-break/><text:span text:style-name="T1"> </text:span><text:span text:style-name="T2">(67/19) </text:span> ⲙ̣ ⲙⲁ ⲁⲛ ⲉⲩⲡⲛ̅ⲁ̅ ⲛ ⲟⲩⲱⲧ’ <text:line-break/><text:span text:style-name="T1"> </text:span><text:span text:style-name="T2">(67/20) </text:span> [ⲡ]ⲉ ⲛ ⲧⲉⲗⲓⲟⲥ ⲛ ϩⲁⲡⲗⲟⲩⲛ <text:line-break/><text:span text:style-name="T1"> </text:span><text:span text:style-name="T2">(67/21) </text:span> [ⲉⲩ]ⲧⲟⲡⲟⲥ ⲛⲧⲁϥ ⲡⲉ ⲙⲛ <text:line-break/><text:span text:style-name="T1"> </text:span><text:span text:style-name="T2">(67/22) </text:span> [...] ⲉϥϣⲱⲡⲉ ϩⲣⲁⲓ̈ ⲛϩⲏⲧϥ <text:line-break/><text:span text:style-name="T1"> </text:span><text:span text:style-name="T2">(67/23) </text:span> [ⲁⲩ]ⲱ ⲛⲓⲧⲏⲣⲟⲩ· ⲁⲩⲱ <text:line-break/><text:span text:style-name="T1"> </text:span><text:span text:style-name="T2">(67/24) </text:span> [ⲉϥϣ]ⲟⲟⲡ’ ⲛⲧⲟϥ ⲛϭⲓ ⲡⲉⲧ’‐ <text:line-break/><text:span text:style-name="T1"> </text:span><text:span text:style-name="T2">(68/1) </text:span> [........]...[..]ⲡ̣[ <text:line-break/><text:span text:style-name="T1"> </text:span><text:span text:style-name="T2">(68/2) </text:span> [........] ⲙⲛ ⲟ̣ⲩⲱ̣[ <text:line-break/><text:span text:style-name="T1"> </text:span><text:span text:style-name="T2">(68/3) </text:span> ⲁⲩⲱ̣ [ⲟ]ⲩⲣⲉϥϣⲱⲡ [ⲛϩⲣⲁⲓ̈] <text:line-break/><text:span text:style-name="T1"> </text:span><text:span text:style-name="T2">(68/4) </text:span> ⲛϩⲏⲧ[ϥ ʹ264] ⲡⲓⲱⲛϩ ⲇ[ⲉ <text:line-break/><text:span text:style-name="T1"> </text:span><text:span text:style-name="T2">(68/5) </text:span> [ⲉⲛ]ⲉ̣ⲣⲅⲓⲁ ⲇⲉ ⲛⲧⲉ ϯ[ <text:line-break/><text:span text:style-name="T1"> </text:span><text:span text:style-name="T2">(68/6) </text:span> [.]ⲥ ⲛⲛ ⲁⲧⲟⲩⲥⲓⲁ̣· ⲡ[ <text:line-break/><text:span text:style-name="T1"> </text:span><text:span text:style-name="T2">(68/7) </text:span> [ⲉ]ⲧ’ϣⲟⲟⲡ’ ⲛϩⲏ̣[ⲧϥ <text:line-break/><text:span text:style-name="T1"> </text:span><text:span text:style-name="T2">(68/8) </text:span> [ϣⲟ]ⲟⲡ’ ⲛϩⲏⲧϥ [ <text:line-break/><text:span text:style-name="T1"> </text:span><text:span text:style-name="T2">(68/9) </text:span> ϣⲟⲟⲡ’ ⲉⲧⲃⲏⲏⲧ̣[ϥ <text:line-break/><text:span text:style-name="T1"> </text:span><text:span text:style-name="T2">(68/10) </text:span> ⲙⲁⲕⲁⲣⲓⲟⲥ ⲙⲛ ⲟ[ⲩ <text:line-break/><text:span text:style-name="T1"> </text:span><text:span text:style-name="T2">(68/11) </text:span> [ⲧ]ⲉⲗⲓⲟⲥ· ⲁⲩⲱ [ <text:line-break/><text:span text:style-name="T1"> </text:span><text:span text:style-name="T2">(68/12) </text:span> [ⲉ]ⲧ’ϣⲟⲟⲡ’ ϩⲛ [ <text:line-break/><text:span text:style-name="T1"> </text:span><text:span text:style-name="T2">(68/13) </text:span> ⲉⲧ’ϣⲟⲟⲡ’ ⲟⲛⲧⲱ̣ⲥ̣ [ⲟⲩ]‐ <text:line-break/><text:span text:style-name="T1"> </text:span><text:span text:style-name="T2">(68/14) </text:span> ⲙⲁⲕⲁⲣⲓⲟⲥ ⲧⲉ ϯⲉⲓⲇ[ⲉⲁ] <text:line-break/><text:span text:style-name="T1"> </text:span><text:span text:style-name="T2">(68/15) </text:span> ⲛⲧⲉ ϯⲉⲛⲉⲣⲅⲓⲁ ⲉⲧ’[ϣⲟ]‐ <text:line-break/><text:span text:style-name="T1"> </text:span><text:span text:style-name="T2">(68/16) </text:span> ⲟⲡ’ ⲉϣⲁϥϫⲓ ⲛ ϯϩⲩⲡ[ⲁⲣ]‐ <text:line-break/><text:span text:style-name="T1"> </text:span><text:span text:style-name="T2">(68/17) </text:span> ⲝⲓⲥ· ϣⲁϥϫⲓ ϭⲟⲙ ⲡ[ <text:line-break/><text:span text:style-name="T1"> </text:span><text:span text:style-name="T2">(68/18) </text:span> ⲟⲩⲙⲛⲧ’ⲧⲉⲗⲓⲟⲥ ⲉⲙ[ <text:line-break/><text:soft-page-break/><text:span text:style-name="T1"> </text:span><text:span text:style-name="T2">(68/19) </text:span> ⲡⲱⲣϫ ⲉⲃⲟⲗ ⲉⲛⲉϩ· ⲧⲟ[ⲧⲉ] <text:line-break/><text:span text:style-name="T1"> </text:span><text:span text:style-name="T2">(68/20) </text:span> ϥϣⲟⲟⲡ’ ⲛ ⲧⲉⲗⲓⲟⲥ· ⲉⲧⲃ̣[ⲉ] <text:line-break/><text:span text:style-name="T1"> </text:span><text:span text:style-name="T2">(68/21) </text:span> ⲡⲁⲓ̈ ϥϣⲟⲟⲡ’ ⲛ ⲧⲉⲗⲓⲟⲥ <text:line-break/><text:span text:style-name="T1"> </text:span><text:span text:style-name="T2">(68/22) </text:span> ⲉϥⲉ ⲛⲛ ⲁⲧ’ⲡⲱⲣϫ ⲉⲣⲟϥ <text:line-break/><text:span text:style-name="T1"> </text:span><text:span text:style-name="T2">(68/23) </text:span> ⲙⲛ ⲡⲉϥⲥⲁ ⲙⲙⲓⲛ ⲙⲙⲟϥ̣ <text:line-break/><text:span text:style-name="T1"> </text:span><text:span text:style-name="T2">(68/24) </text:span> ⲙⲙⲛ ⲗⲁⲁⲩ ⲅⲁⲣ ⲉϥϣ̣[ⲟ]‐ <text:line-break/><text:span text:style-name="T1"> </text:span><text:span text:style-name="T2">(68/25) </text:span> ⲟⲡ’ ϩⲁ ⲧⲉϥⲉϩⲏ ⲉⲓⲙⲏ[ⲧⲓ] <text:line-break/><text:span text:style-name="T1"> </text:span><text:span text:style-name="T2">(68/26) </text:span> ϯⲙⲛⲧ’ⲟⲩⲱⲧ’ ⲛ ⲧⲉ̣[ⲗⲓⲟⲥ] <text:line-break/><text:span text:style-name="T1"> </text:span><text:span text:style-name="T2">(69/1) </text:span> (Page 69 does not survive. It was probably a blank, <text:line-break/><text:span text:style-name="T1"> </text:span><text:span text:style-name="T2">(69/2) </text:span> but was counted in the paging.) <text:line-break/><text:span text:style-name="T1"> </text:span><text:span text:style-name="T2">(70/1) </text:span> (Page 70 does not survive. It was probably a blank, <text:line-break/><text:span text:style-name="T1"> </text:span><text:span text:style-name="T2">(70/2) </text:span> but was counted in the paging.) <text:line-break/><text:span text:style-name="T1"> </text:span><text:span text:style-name="T2">(71/1) </text:span> (Page 71 is blank; it may have had pagination.) <text:line-break/><text:span text:style-name="T1"> </text:span><text:span text:style-name="T2">(72/1) </text:span> (Page 72 is blank; it may have had pagination.) <text:line-break/><text:span text:style-name="T1"> </text:span><text:span text:style-name="T2">(73/1) </text:span> [.....]ϩⲩⲡⲁⲣ[ⲝⲓⲥ <text:line-break/><text:span text:style-name="T1"> </text:span><text:span text:style-name="T2">(73/2) </text:span> [....].ⲟ[ⲩ]ϫⲁⲓ̈ ⲧⲉ ⲛ [ <text:line-break/><text:span text:style-name="T1"> </text:span><text:span text:style-name="T2">(73/3) </text:span> [.ⲧⲏ]ⲣⲟⲩ[·] ⲁⲩⲱ ⲡⲏ ⲉ̣[ <text:line-break/><text:span text:style-name="T1"> </text:span><text:span text:style-name="T2">(73/4) </text:span> [...]ϣϭⲟⲙ ⲟⲩⲇⲉ ⲛϥ[ <text:line-break/><text:span text:style-name="T1"> </text:span><text:span text:style-name="T2">(73/5) </text:span> [...]ⲟⲟϥ· ⲉϣⲱⲡⲉ ⲉϥ̣[ϣⲁⲛ]‐ <text:line-break/><text:span text:style-name="T1"> </text:span><text:span text:style-name="T2">(73/6) </text:span> [...]ⲛ̣ⲧϥ ⲛⲁϥ ⲛⲁⲓ̈ ⲧⲏⲣ[ⲟⲩ] <text:line-break/><text:span text:style-name="T1"> </text:span><text:span text:style-name="T2">(73/7) </text:span> [...] ⲉⲃⲟⲗ· ⲡⲏ ⲅⲁⲣ ⲉⲧ’̣[ <text:line-break/><text:span text:style-name="T1"> </text:span><text:span text:style-name="T2">(73/8) </text:span> [....] ϩ̣ⲛ ϯϩⲩⲡⲁⲣⲝⲓⲥ̣ <text:line-break/><text:span text:style-name="T1"> </text:span><text:span text:style-name="T2">(73/9) </text:span> [..] ⲡ̣ⲁⲓ̈ ⲡⲁⲛⲧⲱⲥ ϥϣ̣ⲟ̣‐ <text:line-break/><text:span text:style-name="T1"> </text:span><text:span text:style-name="T2">(73/10) </text:span> [ⲟⲡ’] ⲙ ⲡⲓⲱⲛϩ· ϩⲛ ϯⲙⲛⲧ’̣‐ <text:line-break/><text:span text:style-name="T1"> </text:span><text:span text:style-name="T2">(73/11) </text:span> [ⲙⲁ]ⲕⲁⲣⲓⲟⲥ ⲇⲉ ϥⲓⲙⲉ· ⲁⲩⲱ̣ <text:line-break/><text:span text:style-name="T1"> </text:span><text:span text:style-name="T2">(73/12) </text:span> [ⲉϣ]ⲱⲡ’ ⲉϥϣⲁⲛϫⲓ ⲙⲛ ⲛⲓ‐ <text:line-break/><text:span text:style-name="T1"> </text:span><text:span text:style-name="T2">(73/13) </text:span> [ⲉⲟ]ⲟ̣ⲩ ⲟⲩⲧⲉⲗⲓⲟⲥ ⲡⲉ· <text:line-break/><text:span text:style-name="T1"> </text:span><text:span text:style-name="T2">(73/14) </text:span> [ⲉϣ]ⲱⲡⲉ ⲇⲉ ⲉϥϣⲁⲛϫⲓ ⲙⲛ <text:line-break/><text:span text:style-name="T1"> </text:span><text:span text:style-name="T2">(73/15) </text:span> [ⲥⲛⲁ]ⲩ ⲏ%0 ⲟⲩⲁ· ⲟⲩϯϩⲉ ⲡⲉ <text:line-break/><text:span text:style-name="T1"> </text:span><text:span text:style-name="T2">(73/16) </text:span> [ⲙ ⲡ]ⲣⲏⲧⲉ ⲉⲧⲁϥϫⲓ ⲉⲃⲟⲗ <text:line-break/><text:span text:style-name="T1"> </text:span><text:span text:style-name="T2">(73/17) </text:span> [ⲙⲙ]ⲟϥ· ⲉⲩϣⲟⲟⲡ’ ⲉⲧⲃⲉ <text:line-break/><text:span text:style-name="T1"> </text:span><text:span text:style-name="T2">(73/18) </text:span> [ⲡⲁ]ⲓ̣̈ ⲛϭⲓ ⲛⲏ ⲉⲧⲉ ⲟⲩⲛ ⲯⲩⲭⲏ <text:line-break/><text:span text:style-name="T1"> </text:span><text:span text:style-name="T2">(73/19) </text:span> [ⲛϩ]ⲏⲧⲟⲩ ⲙⲛ ⲛⲓⲁⲧ’ⲯⲩⲭⲏ· <text:line-break/><text:span text:style-name="T1"> </text:span><text:span text:style-name="T2">(73/20) </text:span> [ⲉⲧ]ⲃⲉ ⲡⲁⲓ̈ ⲛⲏ ⲉⲧⲛⲉⲛⲟⲩ‐ <text:line-break/><text:span text:style-name="T1"> </text:span><text:span text:style-name="T2">(73/21) </text:span> [ϩⲙ] ⲉ̣ⲧⲃⲉ ⲡⲁⲓ̈ ⲛⲏ ⲉⲧⲛⲁ‐ <text:line-break/><text:span text:style-name="T1"> </text:span><text:span text:style-name="T2">(73/22) </text:span> [ⲧⲁ]ⲕⲟ· ⲉϣⲱⲡⲉ ⲉⲙⲡⲟⲩ‐ <text:line-break/><text:span text:style-name="T1"> </text:span><text:span text:style-name="T2">(73/23) </text:span> [ϫⲓ ⲉ]ⲃⲟⲗ ⲙⲙⲟϥ· ⲉⲧⲃⲉ <text:line-break/><text:span text:style-name="T1"> </text:span><text:span text:style-name="T2">(73/24) </text:span> [ⲡⲁ]ⲓ̈ ⲟⲩϩⲩⲗⲏ ⲧⲉ ⲙⲛ ϩⲉⲛ‐ <text:line-break/><text:span text:style-name="T1"> </text:span><text:span text:style-name="T2">(73/25) </text:span> [ⲥ]ⲱ̣ⲙⲁ· ⲉⲧⲃⲉ ⲡⲁⲓ̈ ⲟⲩⲁⲧ’‐ <text:line-break/><text:span text:style-name="T1"> </text:span><text:span text:style-name="T2">(74/1) </text:span> [......]ⲩ̣ⲛⲟⲩⲁ[ <text:line-break/><text:span text:style-name="T1"> </text:span><text:span text:style-name="T2">(74/2) </text:span> [ⲉⲧ]ⲃⲉ ⲡⲁⲓ̈ ⲉⲑ̣[.]ⲉ̣[ <text:line-break/><text:span text:style-name="T1"> </text:span><text:span text:style-name="T2">(74/3) </text:span> [..]ⲟⲩ [ⲧ]ⲏⲣϥ [.] ⲉⲧⲃⲉ̣[ <text:line-break/><text:span text:style-name="T1"> </text:span><text:span text:style-name="T2">(74/4) </text:span> [.].ⲣⲟ. ⲡⲁⲓ̈ [.]ⲉ̣ⲧⲣ ϣ[ⲣⲡ’ ⲛ] <text:line-break/><text:span text:style-name="T1"> </text:span><text:span text:style-name="T2">(74/5) </text:span> [ϣ]ⲟⲟⲡ’· ⲁⲩ̣ⲱ ⲉϥ.[ <text:line-break/><text:span text:style-name="T1"> </text:span><text:span text:style-name="T2">(74/6) </text:span> [.]ⲩ̣ⲉ ⲟⲩⲁⲡⲉ ⲛ ϩⲁⲡ[ⲗⲟⲩⲛ <text:line-break/><text:span text:style-name="T1"> </text:span><text:span text:style-name="T2">(74/7) </text:span> [..]ⲡⲛ̅ⲁ̅ ⲟⲩⲱⲧ’ ⲉ̣[ <text:line-break/><text:span text:style-name="T1"> </text:span><text:span text:style-name="T2">(74/8) </text:span> ⲣ[..] ⲉⲣⲟϥ ⲡⲉ· ⲁⲩⲱ̣ [ ϩⲩ]‐ <text:line-break/><text:soft-page-break/><text:span text:style-name="T1"> </text:span><text:span text:style-name="T2">(74/9) </text:span> ⲡⲁⲣⲝⲓⲥ ϯⲉⲓⲇⲉⲁ [ <text:line-break/><text:span text:style-name="T1"> </text:span><text:span text:style-name="T2">(74/10) </text:span> [.]ⲉ ⲛⲧⲁϥ· ⲁⲩⲱ ⲕⲁ[ⲧⲁ ϯⲉ]‐ <text:line-break/><text:span text:style-name="T1"> </text:span><text:span text:style-name="T2">(74/11) </text:span> [ⲛ]ⲉⲣⲅⲓⲁ ⲉⲧⲉ ⲡⲓⲱⲛϩ [ <text:line-break/><text:span text:style-name="T1"> </text:span><text:span text:style-name="T2">(74/12) </text:span> ⲡⲉ· ⲁⲩⲱ ⲕⲁⲧⲁ ϯⲙⲛ[ⲧ’ⲧⲉ]‐ <text:line-break/><text:span text:style-name="T1"> </text:span><text:span text:style-name="T2">(74/13) </text:span> ⲗⲓⲟⲥ ⲉⲧⲉ ϯϭⲟⲙ ⲧ[ⲉ ⲛ ⲛⲟ]‐ <text:line-break/><text:span text:style-name="T1"> </text:span><text:span text:style-name="T2">(74/14) </text:span> ⲉⲣⲟⲛ ⲉⲩⲟⲩⲟⲉⲓⲛ ⲧ[ⲉ <text:line-break/><text:span text:style-name="T1"> </text:span><text:span text:style-name="T2">(74/15) </text:span> ⲡⲓϣⲟⲙⲧ’ ⲉϥⲁϩⲉⲣⲁⲧ̣[ϥ ϩⲓ ⲟⲩ]‐ <text:line-break/><text:span text:style-name="T1"> </text:span><text:span text:style-name="T2">(74/16) </text:span> ⲥⲟⲡ’ ⲉϥⲕⲓⲙ ϩⲓ ⲟⲩⲥ̣[ⲟⲡ’] <text:line-break/><text:span text:style-name="T1"> </text:span><text:span text:style-name="T2">(74/17) </text:span> ⲛϩⲣⲁⲓ̈ ϩⲙ ⲙⲁ ⲛⲓⲙ ⲁⲩ̣[ⲱ ϩⲣⲁⲓ̈] <text:line-break/><text:span text:style-name="T1"> </text:span><text:span text:style-name="T2">(74/18) </text:span> ϩⲛ ⲗⲁⲁⲩ ⲙ ⲙⲁ ⲁⲛ ⲉϥ[ <text:line-break/><text:span text:style-name="T1"> </text:span><text:span text:style-name="T2">(74/19) </text:span> ⲛⲁⲩ ⲧⲏⲣⲟⲩ ⲁⲩⲱ ⲉϥ[ⲣ ⲉ]‐ <text:line-break/><text:span text:style-name="T1"> </text:span><text:span text:style-name="T2">(74/20) </text:span> ⲛⲉⲣⲅⲓ ⲡⲓⲁⲧ’ϣⲁϫⲉ ⲙ[ⲙⲟϥ] <text:line-break/><text:span text:style-name="T1"> </text:span><text:span text:style-name="T2">(74/21) </text:span> ⲛ ⲁⲧ’ϯ ⲣⲁⲛ ⲉⲣⲟϥ· ⲛ [ <text:line-break/><text:span text:style-name="T1"> </text:span><text:span text:style-name="T2">(74/22) </text:span> ϣⲟⲟⲡ’ ⲉⲃⲟⲗ ⲙⲙⲟϥ [ <text:line-break/><text:span text:style-name="T1"> </text:span><text:span text:style-name="T2">(74/23) </text:span> ⲙⲉ ⲉϥⲙⲟⲧⲛ ⲙⲙⲟϥ ⲛ̣[ <text:line-break/><text:span text:style-name="T1"> </text:span><text:span text:style-name="T2">(74/24) </text:span> ϩⲛ ⲧⲉϥⲙⲛⲧ’ⲧⲉⲗⲓⲟⲥ̣ [ ⲙ]‐ <text:line-break/><text:span text:style-name="T1"> </text:span><text:span text:style-name="T2">(74/25) </text:span> ⲡϥϫⲓ ⲉⲃⲟⲗ ϩⲙ ⲙⲟⲣⲫ̣[ⲏ ⲛⲓⲙ <text:line-break/><text:span text:style-name="T1"> </text:span><text:span text:style-name="T2">(75/1) </text:span> [ⲉⲧ]ⲃⲉ ⲡⲁⲓ̣̈ [ <text:line-break/><text:span text:style-name="T1"> </text:span><text:span text:style-name="T2">(75/2) </text:span> [.].ⲟⲩ.[........]ʹ264[.. <text:line-break/><text:span text:style-name="T1"> </text:span><text:span text:style-name="T2">(75/3) </text:span> [...]ⲧⲩ[.....].ⲟⲩ[.. <text:line-break/><text:span text:style-name="T1"> </text:span><text:span text:style-name="T2">(75/4) </text:span> [..] ⲛ ⲗⲁ[ⲁⲩ ...]ⲉⲛⲏⲥ̣[. <text:line-break/><text:span text:style-name="T1"> </text:span><text:span text:style-name="T2">(75/5) </text:span> [...]ⲡ[......]ⲟⲥ ⲙⲛ [. <text:line-break/><text:span text:style-name="T1"> </text:span><text:span text:style-name="T2">(75/6) </text:span> [...]ⲟ̣[...].ⲁⲡ̣ⲁ̣ⲡⲓʹ264.[. <text:line-break/><text:span text:style-name="T1"> </text:span><text:span text:style-name="T2">(75/7) </text:span> [......] ϩⲛ ϯϩⲩⲡⲁⲣⲝ[ⲓⲥ <text:line-break/><text:span text:style-name="T1"> </text:span><text:span text:style-name="T2">(75/8) </text:span> [.....]ϣⲟⲟⲡ’ ϩⲛ ϯⲙⲛⲧ’‐ <text:line-break/><text:span text:style-name="T1"> </text:span><text:span text:style-name="T2">(75/9) </text:span> [...] ⲛⲧⲉ ⲡⲓⲱⲛϩ· ϩⲛ ϯ̅ <text:line-break/><text:span text:style-name="T1"> </text:span><text:span text:style-name="T2">(75/10) </text:span> [ⲙⲛⲧ’]ⲧⲉⲗⲓⲟⲥ ⲇⲉ ⲙⲛ ϯⲙⲛ̣[ⲧ’]‐ <text:line-break/><text:span text:style-name="T1"> </text:span><text:span text:style-name="T2">(75/11) </text:span> [ⲙ]ⲉ· ϯⲙⲛⲧ’ⲙⲁⲕⲁⲣⲓⲟ̣ⲥ̣ <text:line-break/><text:span text:style-name="T1"> </text:span><text:span text:style-name="T2">(75/12) </text:span> [ⲛⲁⲓ̈ ⲧ]ⲏⲣⲟⲩ ⲇⲉ ⲛⲉⲩϣⲟⲟⲡ’ <text:line-break/><text:span text:style-name="T1"> </text:span><text:span text:style-name="T2">(75/13) </text:span> [ϩⲛ ϯ]ⲙ̣ⲛⲧ’ⲁⲧ’ⲡⲱⲣϫ ⲛⲧⲉ <text:line-break/><text:span text:style-name="T1"> </text:span><text:span text:style-name="T2">(75/14) </text:span> [ⲡⲓ]ⲡⲛ̅ⲁ̅· ϯⲙⲛⲧ’ⲉⲓⲙⲉ ⲇⲉ <text:line-break/><text:span text:style-name="T1"> </text:span><text:span text:style-name="T2">(75/15) </text:span> [...] ⲉⲧⲃⲏⲏⲧⲥ ⲡⲉ ϯⲙⲛⲧ’‐ <text:line-break/><text:span text:style-name="T1"> </text:span><text:span text:style-name="T2">(75/16) </text:span> [ⲛⲟ]ⲩⲧⲉ ⲙⲛ ϯⲙⲛⲧ’ⲁⲧⲟⲩ‐ <text:line-break/><text:span text:style-name="T1"> </text:span><text:span text:style-name="T2">(75/17) </text:span> [..]ⲁ ⲁⲩⲱ ϯⲙⲛⲧ’ⲙⲁⲕⲁ‐ <text:line-break/><text:span text:style-name="T1"> </text:span><text:span text:style-name="T2">(75/18) </text:span> [ⲣⲓⲟ]ⲥ ⲙⲛ ⲡⲓⲱⲛϩ· ⲁⲩⲱ ϯ‐ <text:line-break/><text:span text:style-name="T1"> </text:span><text:span text:style-name="T2">(75/19) </text:span> [ⲙⲛ]ⲧ’ⲉⲓⲙⲉ ⲙⲛ ϯⲙⲛⲧ’ⲁⲅⲁ‐ <text:line-break/><text:span text:style-name="T1"> </text:span><text:span text:style-name="T2">(75/20) </text:span> ⲑ̣ⲟ̣ⲥ· ⲁⲩⲱ ⲟⲩϩⲉⲛⲛⲁⲥ <text:line-break/><text:span text:style-name="T1"> </text:span><text:span text:style-name="T2">(75/21) </text:span> ⲙ[ⲛ] ⲟⲩⲙⲛⲧ’ⲟⲩⲱⲧ’· ⲁⲩⲱ <text:line-break/><text:span text:style-name="T1"> </text:span><text:span text:style-name="T2">(75/22) </text:span> ϩ[ⲁ]ⲡⲗⲱⲥ ⲛⲁⲓ̈ ⲧⲏⲣⲟⲩ ⲡⲓ‐ <text:line-break/><text:span text:style-name="T1"> </text:span><text:span text:style-name="T2">(75/23) </text:span> ⲧ[ⲃ]ⲃ̣ⲟ ⲛⲧⲉ ϯⲙⲛⲧ’ⲁⲧⲙⲓⲥⲉ <text:line-break/><text:span text:style-name="T1"> </text:span><text:span text:style-name="T2">(75/24) </text:span> [..]ⲣ ϣⲟⲣⲡ’ ⲛ ϣⲟⲟⲡ’ ⲛⲁϥ <text:line-break/><text:span text:style-name="T1"> </text:span><text:span text:style-name="T2">(75/25) </text:span> [..]ⲓ ⲛⲁⲓ̈ ⲧⲏⲣⲟⲩ ⲙⲛ ⲡⲓ‐ <text:line-break/><text:span text:style-name="T1"> </text:span><text:span text:style-name="T2">(76/1) </text:span> [ ]ⲛⲉϥⲙ[ <text:line-break/><text:span text:style-name="T1"> </text:span><text:span text:style-name="T2">(76/2) </text:span> [ ϩⲣⲁ]ⲓ̈ ϩⲛ ⲛ̣[ <text:line-break/><text:span text:style-name="T1"> </text:span><text:span text:style-name="T2">(76/3) </text:span> [...].[........]ⲟⲗ.[ <text:line-break/><text:span text:style-name="T1"> </text:span><text:span text:style-name="T2">(76/4) </text:span> [...]ⲧⲁ[......] ⲙ ⲡⲣ[ <text:line-break/><text:span text:style-name="T1"> </text:span><text:span text:style-name="T2">(76/5) </text:span> [..]ⲟⲩⲥ ϯ[.....]ⲩⲥ ⲡ[ <text:line-break/><text:soft-page-break/><text:span text:style-name="T1"> </text:span><text:span text:style-name="T2">(76/6) </text:span> [...]ⲩⲟⲉⲓ[ⲛ] ⲉ[....]ⲉⲩ̣[ <text:line-break/><text:span text:style-name="T1"> </text:span><text:span text:style-name="T2">(76/7) </text:span> [ⲟ]ⲩⲁⲓⲱⲛ ⲟⲩϭ.[ <text:line-break/><text:span text:style-name="T1"> </text:span><text:span text:style-name="T2">(76/8) </text:span> ⲛ̣[ϩ]ⲣⲁⲓ̈ ϩⲛ ⲟⲩⲙⲉ[ <text:line-break/><text:span text:style-name="T1"> </text:span><text:span text:style-name="T2">(76/9) </text:span> ⲙⲛⲧ’ⲁⲧ’ⲙⲓⲥⲉ· ⲉϥ̣ϣ̣[ <text:line-break/><text:span text:style-name="T1"> </text:span><text:span text:style-name="T2">(76/10) </text:span> ⲁ̣ⲣ ⲛ ⲟⲩⲁⲉⲓϣ ⲛⲓⲙ ⲁϥ̣[ <text:line-break/><text:span text:style-name="T1"> </text:span><text:span text:style-name="T2">(76/11) </text:span> [ⲛ]ⲥⲱϥ ⲉϥⲛⲁⲩ ⲉⲣⲟϥ .[ <text:line-break/><text:span text:style-name="T1"> </text:span><text:span text:style-name="T2">(76/12) </text:span> ⲁⲩⲱ ⲉϥϣⲟⲟⲡ’ ⲉⲟⲩ̣[ⲁ ⲡⲉ] <text:line-break/><text:span text:style-name="T1"> </text:span><text:span text:style-name="T2">(76/13) </text:span> ⲛ ϩⲁⲡⲗⲟⲩⲛ· ⲉⲩⲙⲛ[ⲧ’ⲙⲁ]‐ <text:line-break/><text:span text:style-name="T1"> </text:span><text:span text:style-name="T2">(76/14) </text:span> ⲕⲁⲣⲓⲟⲥ ⲡⲉ ⲛϩⲣⲁⲓ̈ ϩⲛ ⲟ[ⲩ]‐ <text:line-break/><text:span text:style-name="T1"> </text:span><text:span text:style-name="T2">(76/15) </text:span> ⲙⲛⲧ’ⲧⲉⲗⲓⲟⲥ ⲛⲉⲟⲩⲁ̣[ <text:line-break/><text:span text:style-name="T1"> </text:span><text:span text:style-name="T2">(76/16) </text:span> ⲛ ⲧⲉⲗⲓⲟⲥ ⲁⲩⲱ ⲙ ⲙⲁⲕ̣[ⲁⲣⲓⲟⲥ] <text:line-break/><text:span text:style-name="T1"> </text:span><text:span text:style-name="T2">(76/17) </text:span> ⲉⲥⲣ ϩⲁⲉ ⲙ ⲡⲁⲓ̈ ⲛⲧⲉ ⲡⲏ̣ [ⲉ]‐ <text:line-break/><text:span text:style-name="T1"> </text:span><text:span text:style-name="T2">(76/18) </text:span> ⲧⲙⲙⲁⲩ ϫⲉ ⲛⲁⲥⲣ ϩⲁⲉ̣[ <text:line-break/><text:span text:style-name="T1"> </text:span><text:span text:style-name="T2">(76/19) </text:span> ⲛⲧⲁϥ ϫⲉ ⲛⲉϥⲟⲩⲏϩ ⲛⲥ̣[ⲱⲥ] <text:line-break/><text:span text:style-name="T1"> </text:span><text:span text:style-name="T2">(76/20) </text:span> ⲡⲉ ⲙⲛ ⲟⲩⲥⲟⲟⲩⲛ· ⲁ[ⲩ]ⲱ̣ <text:line-break/><text:span text:style-name="T1"> </text:span><text:span text:style-name="T2">(76/21) </text:span> ⲟⲩⲅⲛⲱⲥⲓⲥ ⲛⲧⲁϥ ⲉ[ϥ]ϣⲟ‐ <text:line-break/><text:span text:style-name="T1"> </text:span><text:span text:style-name="T2">(76/22) </text:span> ⲟⲡ’ ⲛⲥⲁⲃⲟⲗ ⲙⲙⲟϥ· ⲙ̣ⲛ <text:line-break/><text:span text:style-name="T1"> </text:span><text:span text:style-name="T2">(76/23) </text:span> ⲡⲏ ⲉⲧ’ⲙⲟⲩϣⲧ’ ⲙⲙ[ⲟ]ϥ <text:line-break/><text:span text:style-name="T1"> </text:span><text:span text:style-name="T2">(76/24) </text:span> ⲉϥϣⲟⲟⲡ’ ⲛϩⲏⲧϥ· ⲟ̣[ⲩ]‐ <text:line-break/><text:span text:style-name="T1"> </text:span><text:span text:style-name="T2">(76/25) </text:span> ⲉⲓⲇⲱⲗⲟⲛ ⲙⲛ ⲟⲩϩⲓ[ <text:line-break/><text:span text:style-name="T1"> </text:span><text:span text:style-name="T2">(77/1) </text:span> [..]ⲣ ϩⲁⲉ ⲙ̣[......... <text:line-break/><text:span text:style-name="T1"> </text:span><text:span text:style-name="T2">(77/2) </text:span> [...]ⲙⲁⲩ [........]ⲉ̣[.. <text:line-break/><text:span text:style-name="T1"> </text:span><text:span text:style-name="T2">(77/3) </text:span> [...]ⲙⲁⲩ [......ϩⲁ]ⲡ[ⲗⲟ]ⲩ̅ <text:line-break/><text:span text:style-name="T1"> </text:span><text:span text:style-name="T2">(77/4) </text:span> [...]ⲡⲉⲉ̣[.....]ⲉϥⲡ̣[.. <text:line-break/><text:span text:style-name="T1"> </text:span><text:span text:style-name="T2">(77/5) </text:span> [...]ⲥⲟ[......]ⲛ̣ⲁⲩ· ⲁ[ⲩ]ⲱ̣ <text:line-break/><text:span text:style-name="T1"> </text:span><text:span text:style-name="T2">(77/6) </text:span> [..].ⲉⲉ[...]ⲉ̣ⲛ[.]ϥⲛⲁϩ[.]ⲉ̣ <text:line-break/><text:span text:style-name="T1"> </text:span><text:span text:style-name="T2">(77/7) </text:span> [...]ⲧ’ⲁ̣[...]. ⲡⲁⲓ̈ ⲁⲥϣⲱ̣[.]ⲡ̣ <text:line-break/><text:span text:style-name="T1"> </text:span><text:span text:style-name="T2">(77/8) </text:span> [.....]ⲗ ⲙ ⲡⲓⲡⲗⲏⲣⲱⲙⲁ <text:line-break/><text:span text:style-name="T1"> </text:span><text:span text:style-name="T2">(77/9) </text:span> [...]. ⲉⲧⲁⲥⲟⲩⲁϣϥ ϩⲱ‐ <text:line-break/><text:span text:style-name="T1"> </text:span><text:span text:style-name="T2">(77/10) </text:span> [ⲱⲥ ⲛ]ⲁ̣ⲥ ⲁⲛ· ⲡⲁⲓ̈ ⲛⲧⲁⲥ‐ <text:line-break/><text:span text:style-name="T1"> </text:span><text:span text:style-name="T2">(77/11) </text:span> [...]ⲁⲁϥ ⲛⲥⲁⲃⲟⲗ ⲛ ϯⲙⲛⲧ’‐ <text:line-break/><text:span text:style-name="T1"> </text:span><text:span text:style-name="T2">(77/12) </text:span> [ⲧⲉⲗⲓ]ⲟ̣ⲥ· ⲁⲥⲡⲱⲣϫ ⲉⲃⲟⲗ <text:line-break/><text:span text:style-name="T1"> </text:span><text:span text:style-name="T2">(77/13) </text:span> [ⲧⲙⲛⲧ]ⲡⲁⲛⲧⲉⲗⲓⲟⲥ ⲅⲁⲣ ⲧⲉ <text:line-break/><text:span text:style-name="T1"> </text:span><text:span text:style-name="T2">(77/14) </text:span> [ⲛⲧ]ⲉ ⲟⲩⲙⲛⲧ’ⲧⲉⲗⲓⲟⲥ ⲉⲥ‐ <text:line-break/><text:span text:style-name="T1"> </text:span><text:span text:style-name="T2">(77/15) </text:span> ϣⲟⲟⲡ’ ⲛ ⲟⲩⲙⲟⲩϣⲧ’· <text:line-break/><text:span text:style-name="T1"> </text:span><text:span text:style-name="T2">(77/16) </text:span> [ⲁ]ⲩ̣ⲱ ⲡⲣⲟⲥ ⲡⲏ ⲉⲧⲙⲙⲁⲩ <text:line-break/><text:span text:style-name="T1"> </text:span><text:span text:style-name="T2">(77/17) </text:span> [ⲧⲏ] ⲟⲩϫⲡⲟ ⲧⲉ ⲉⲥⲟⲩⲏϩ ⲛ‐ <text:line-break/><text:span text:style-name="T1"> </text:span><text:span text:style-name="T2">(77/18) </text:span> ⲥⲱϥ· ⲁⲩⲱ ϯⲉⲃⲟⲗ ϩⲛ ϯ‐ <text:line-break/><text:span text:style-name="T1"> </text:span><text:span text:style-name="T2">(77/19) </text:span> [ϭ]ⲟ̣ⲙ ⲛⲛ ⲁⲧ’ϣⲁϫⲉ ⲙⲙⲟⲥ <text:line-break/><text:span text:style-name="T1"> </text:span><text:span text:style-name="T2">(77/20) </text:span> [ⲛ]ⲧⲁϥ· ⲉⲥⲛⲧⲁⲥ ⲙⲙⲁⲩ <text:line-break/><text:span text:style-name="T1"> </text:span><text:span text:style-name="T2">(77/21) </text:span> ⲛ̣ ⲟⲩϣⲟⲣⲡ’ ⲛ ϭⲟⲙ· ⲙⲛ <text:line-break/><text:span text:style-name="T1"> </text:span><text:span text:style-name="T2">(77/22) </text:span> ϯϣⲟⲣⲡ’ ⲙ ⲙⲛⲧ’ⲁⲧⲙⲓⲥⲉ <text:line-break/><text:span text:style-name="T1"> </text:span><text:span text:style-name="T2">(77/23) </text:span> ⲉ̣ⲧ’ⲙⲛⲛⲥⲁ ⲡⲏ ⲉⲧⲙⲙⲁⲩ <text:line-break/><text:span text:style-name="T1"> </text:span><text:span text:style-name="T2">(77/24) </text:span> ϫⲉ ⲡⲣⲟⲥ ⲛⲓⲕⲉϣⲱϫⲡ’ <text:line-break/><text:span text:style-name="T1"> </text:span><text:span text:style-name="T2">(77/25) </text:span> ⲧⲏⲣⲟⲩ ⲟⲩϣⲟⲣⲡ’ ⲛⲛ ⲉⲱⲛ <text:line-break/><text:span text:style-name="T1"> </text:span><text:span text:style-name="T2">(78/1) </text:span> [ ]ⲡⲉ ⲛ [.. <text:line-break/><text:span text:style-name="T1"> </text:span><text:span text:style-name="T2">(78/2) </text:span> [...].[......]ⲁⲧ’ [.. <text:line-break/><text:soft-page-break/><text:span text:style-name="T1"> </text:span><text:span text:style-name="T2">(78/3) </text:span> ⲛ [..]ⲡ[........]ⲧⲧⲟ[.. <text:line-break/><text:span text:style-name="T1"> </text:span><text:span text:style-name="T2">(78/4) </text:span> [ⲧⲏ]ⲣⲟⲩ [......]ⲩⲡⲁ[.. <text:line-break/><text:span text:style-name="T1"> </text:span><text:span text:style-name="T2">(78/5) </text:span> ⲛ[ⲛ] ⲁⲧⲟⲩ[........]ϯ[.. <text:line-break/><text:span text:style-name="T1"> </text:span><text:span text:style-name="T2">(78/6) </text:span> ⲧ[.] ⲛ̣ⲧⲉ ⲡ[.]ⲉ[....].ϥⲉ̣[.. <text:line-break/><text:span text:style-name="T1"> </text:span><text:span text:style-name="T2">(78/7) </text:span> ⲙ[..]ⲉ ⲛⲙ ⲡⲏ .[...... <text:line-break/><text:span text:style-name="T1"> </text:span><text:span text:style-name="T2">(78/8) </text:span> ⲛ [ⲉ]ⲓ̣ⲙⲉ ⲉⲣⲟϥ ⲉϥϣⲟⲟ̣[ⲡ ⲟⲛ]‐ <text:line-break/><text:span text:style-name="T1"> </text:span><text:span text:style-name="T2">(78/9) </text:span> ⲧⲱⲥ ⲉⲩⲉⲱⲛ ⲡⲉ ⲛ ϥ[... <text:line-break/><text:span text:style-name="T1"> </text:span><text:span text:style-name="T2">(78/10) </text:span> ϩⲛ ⲟⲩⲉⲛⲉⲣⲅⲓⲁ ⲇⲉ [.. <text:line-break/><text:span text:style-name="T1"> </text:span><text:span text:style-name="T2">(78/11) </text:span> ϭⲟⲙ ⲁⲩⲱ ⲟⲩϩⲩ.[. <text:line-break/><text:span text:style-name="T1"> </text:span><text:span text:style-name="T2">(78/12) </text:span> ⲛⲛⲁⲥⲣ ⲁⲣⲭⲓ ⲉⲛ ⲛ̣ [.. <text:line-break/><text:span text:style-name="T1"> </text:span><text:span text:style-name="T2">(78/13) </text:span> ⲭⲣⲟⲛⲟⲥ· ⲁⲗⲗⲁ ⲁ̣ⲥ̣ [ⲟⲩⲱ]‐ <text:line-break/><text:span text:style-name="T1"> </text:span><text:span text:style-name="T2">(78/14) </text:span> ⲛϩ ⲉⲃⲟⲗ ϩⲛ ⲟⲩⲙⲛⲧ’ϣⲁ [ⲉ]‐ <text:line-break/><text:span text:style-name="T1"> </text:span><text:span text:style-name="T2">(78/15) </text:span> ⲛⲉϩ· ⲉⲁⲥⲁϩⲉⲣⲁⲧⲥ ⲛⲛ[ⲁ]‐ <text:line-break/><text:span text:style-name="T1"> </text:span><text:span text:style-name="T2">(78/16) </text:span> ϩⲣⲁϥ ϩⲛ ⲟⲩⲙⲛⲧ’ϣⲁ ⲉⲛ̣[ⲉϩ] <text:line-break/><text:span text:style-name="T1"> </text:span><text:span text:style-name="T2">(78/17) </text:span> ⲁⲩⲱ ⲁⲥⲣ ⲉⲃⲏ ⲉⲃⲟⲗ ϩⲓⲧⲛ ϯ‐ <text:line-break/><text:span text:style-name="T1"> </text:span><text:span text:style-name="T2">(78/18) </text:span> ⲙⲛⲧⲛⲟϭ ⲛⲧⲉ ϯⲙⲛⲧ’[.. <text:line-break/><text:span text:style-name="T1"> </text:span><text:span text:style-name="T2">(78/19) </text:span> ⲛⲧⲁϥ· ⲁⲥⲁϩⲉⲣⲁⲧⲥ ⲉ[ⲥ]‐ <text:line-break/><text:span text:style-name="T1"> </text:span><text:span text:style-name="T2">(78/20) </text:span> ⲛⲁⲩ ⲉⲣⲟϥ ⲁⲩⲱ ⲉⲥⲧ[ⲉ]ⲗ̣ⲏ[ⲗ] <text:line-break/><text:span text:style-name="T1"> </text:span><text:span text:style-name="T2">(78/21) </text:span> ⲙⲙⲟⲥ ⲉⲥⲙⲉϩ ⲉⲃⲟⲗ ϩⲛ ⲟ̣[ⲩ]‐ <text:line-break/><text:span text:style-name="T1"> </text:span><text:span text:style-name="T2">(78/22) </text:span> ⲙⲛⲧ’ⲭⲣⲏⲥⲧⲟⲥ ⲙⲙ[ⲟ]ⲥ [.. <text:line-break/><text:span text:style-name="T1"> </text:span><text:span text:style-name="T2">(78/23) </text:span> ⲣϫ ⲉⲃⲟⲗ· ⲁⲗⲗⲁ ⲛⲧⲁⲥⲙⲟ[ <text:line-break/><text:span text:style-name="T1"> </text:span><text:span text:style-name="T2">(79/1) </text:span> [...]ⲛⲟ̣[ <text:line-break/><text:span text:style-name="T1"> </text:span><text:span text:style-name="T2">(79/2) </text:span> [...]ⲧ’ .[.......].[... <text:line-break/><text:span text:style-name="T1"> </text:span><text:span text:style-name="T2">(79/3) </text:span> [...].[.......]ⲛⲧ[.. <text:line-break/><text:span text:style-name="T1"> </text:span><text:span text:style-name="T2">(79/4) </text:span> [....].[.....]ⲧ̣ⲉⲛⲓ̣[..]ⲩ <text:line-break/><text:span text:style-name="T1"> </text:span><text:span text:style-name="T2">(79/5) </text:span> [.........]ⲥ ⲛ ⲛⲁ.[.]ⲩ <text:line-break/><text:span text:style-name="T1"> </text:span><text:span text:style-name="T2">(79/6) </text:span> [.........]ⲉ ⲉⲥϣ[..]ⲡ’ <text:line-break/><text:span text:style-name="T1"> </text:span><text:span text:style-name="T2">(79/7) </text:span> [.......]ϣⲟⲣⲡ’ ⲛ ϩⲩ̣ⲡ̣ⲁⲣ‐ <text:line-break/><text:span text:style-name="T1"> </text:span><text:span text:style-name="T2">(79/8) </text:span> [ⲝⲓⲥ...] ⲁⲧⲟⲩⲥⲓⲁ· ⲙⲛ ⲛ‐ <text:line-break/><text:span text:style-name="T1"> </text:span><text:span text:style-name="T2">(79/9) </text:span> [..]. ⲉⲧⲙ̣ⲙⲁⲩ· ⲉⲃⲟⲗ <text:line-break/><text:span text:style-name="T1"> </text:span><text:span text:style-name="T2">(79/10) </text:span> [ϩ]ⲙ̣ ⲡⲓⲁⲧ’ⲡⲱⲣϫ ⲡⲣⲟⲥ <text:line-break/><text:span text:style-name="T1"> </text:span><text:span text:style-name="T2">(79/11) </text:span> [ϯϩ]ⲩⲡⲁⲣⲝⲓⲥ ϩⲛ ⲟⲩⲉⲛⲉⲣ‐ <text:line-break/><text:span text:style-name="T1"> </text:span><text:span text:style-name="T2">(79/12) </text:span> [ⲅⲓⲁ ⲙⲛ] ϯⲙⲛⲧ’ⲧⲉⲗⲓⲟⲥ ⲛ ⲛⲟ‐ <text:line-break/><text:span text:style-name="T1"> </text:span><text:span text:style-name="T2">(79/13) </text:span> [ⲉⲣⲟⲛ] ⲙⲛ ⲡⲓⲱⲛϩ ⲛ ⲛⲟⲉⲣⲟⲛ <text:line-break/><text:span text:style-name="T1"> </text:span><text:span text:style-name="T2">(79/14) </text:span> [ⲉϥ]ⲕⲓⲙ ⲉⲧⲉ ⲛⲉⲟⲩⲙⲛⲧ’‐ <text:line-break/><text:span text:style-name="T1"> </text:span><text:span text:style-name="T2">(79/15) </text:span> [ⲙⲁ]ⲕⲁⲣⲓⲟⲥ ⲡⲉ ⲙⲛ ⲟⲩⲙⲛ‐ <text:line-break/><text:span text:style-name="T1"> </text:span><text:span text:style-name="T2">(79/16) </text:span> [ⲧⲛ]ⲟ̣ⲩⲧⲉ· ⲁⲩⲱ ⲡⲓⲡ̅ⲛ̅ⲁ̅ <text:line-break/><text:span text:style-name="T1"> </text:span><text:span text:style-name="T2">(79/17) </text:span> [ⲧⲏ]ⲣϥ ⲛ ⲧⲉⲗⲓⲟⲥ ⲛ ϩⲁⲡⲗⲟ̅ⲩ̅ <text:line-break/><text:span text:style-name="T1"> </text:span><text:span text:style-name="T2">(79/18) </text:span> [ⲁ]ⲩⲱ ⲛⲛ ⲁⲧⲛⲁⲩ ⲉⲣⲟϥ <text:line-break/><text:span text:style-name="T1"> </text:span><text:span text:style-name="T2">(79/19) </text:span> [ⲉⲁ]ϥϣⲱⲡⲉ ⲛ ⲟⲩⲙⲛⲧ’ⲟⲩ‐ <text:line-break/><text:span text:style-name="T1"> </text:span><text:span text:style-name="T2">(79/20) </text:span> ⲱ̣ⲧ’ ϩⲛ ⲟⲩϩⲩⲡⲁⲣⲝⲓⲥ ⲙⲛ <text:line-break/><text:span text:style-name="T1"> </text:span><text:span text:style-name="T2">(79/21) </text:span> [ⲟⲩ]ⲉⲛⲉⲣⲅⲓⲁ ⲙⲛ ⲟⲩϣⲙⲧ’‐ <text:line-break/><text:span text:style-name="T1"> </text:span><text:span text:style-name="T2">(79/22) </text:span> [ϭⲟⲙ] ⲛ ϩⲁⲡⲗⲟⲩⲛ· ⲟⲩ‐ <text:line-break/><text:span text:style-name="T1"> </text:span><text:span text:style-name="T2">(79/23) </text:span> [ⲡ̅ⲛ̅ⲁ̅] ⲛ̣ⲛ ⲁⲧⲛⲁⲩ ⲉⲣⲟϥ ⲟⲩ‐ <text:line-break/><text:span text:style-name="T1"> </text:span><text:span text:style-name="T2">(79/24) </text:span> [ϩⲓ]ⲕ̣ⲱⲛ ⲛⲧⲉ ⲡⲏ ⲉⲧ’‐ <text:line-break/><text:span text:style-name="T1"> </text:span><text:span text:style-name="T2">(79/25) </text:span> [ϣ]ⲟⲟⲡ’ ⲟⲛⲧⲱⲥ ⲡⲓⲟⲩⲁ <text:line-break/><text:span text:style-name="T1"> </text:span><text:span text:style-name="T2">(80/1) </text:span> [ ].[ <text:line-break/><text:soft-page-break/><text:span text:style-name="T1"> </text:span><text:span text:style-name="T2">(80/2) </text:span> .[..].[.......].ⲁϥ̣[ <text:line-break/><text:span text:style-name="T1"> </text:span><text:span text:style-name="T2">(80/3) </text:span> ⲝ̣[.].ϭⲙ̣[.......]..[ <text:line-break/><text:span text:style-name="T1"> </text:span><text:span text:style-name="T2">(80/4) </text:span> .[..]...[ <text:line-break/><text:span text:style-name="T1"> </text:span><text:span text:style-name="T2">(80/5) </text:span> .[.] ⲙⲙⲛ[ <text:line-break/><text:span text:style-name="T1"> </text:span><text:span text:style-name="T2">(80/6) </text:span> ⲙ ⲡ̣ⲓⲟⲛ[ⲧ]ⲱ̣ⲥ̣ [ⲉⲧϣⲟⲟⲡ’ <text:line-break/><text:span text:style-name="T1"> </text:span><text:span text:style-name="T2">(80/7) </text:span> ⲉ[ϥ]ϣⲟⲟ̣ⲡ’̣ ϩⲛ ⲟ[ⲩ <text:line-break/><text:span text:style-name="T1"> </text:span><text:span text:style-name="T2">(80/8) </text:span> ⲧⲉ ⲧⲁⲓ̈ ⲉⲩϩⲓⲕⲱⲛ ⲧⲉ .[ <text:line-break/><text:span text:style-name="T1"> </text:span><text:span text:style-name="T2">(80/9) </text:span> ⲡⲉ ϩⲛ ⲟⲩⲕⲱⲧ̣ⲉ ⲙ[ <text:line-break/><text:span text:style-name="T1"> </text:span><text:span text:style-name="T2">(80/10) </text:span> ϭⲟⲙ ⲉ ϩⲱⲧⲡ’ ⲙⲛ ⲡⲉϥ .[ <text:line-break/><text:span text:style-name="T1"> </text:span><text:span text:style-name="T2">(80/11) </text:span> ⲉⲁⲥⲛⲁⲩ ⲉ ⲡⲓϣⲱⲱ̣[ <text:line-break/><text:span text:style-name="T1"> </text:span><text:span text:style-name="T2">(80/12) </text:span> ⲡⲏ ⲉⲛⲉϥϣⲟⲟⲡ’ ⲛⲁ[ <text:line-break/><text:span text:style-name="T1"> </text:span><text:span text:style-name="T2">(80/13) </text:span> ϯⲙⲛⲧ’ⲡⲁⲛⲧⲉⲗⲓⲟⲥ ⲛ [ <text:line-break/><text:span text:style-name="T1"> </text:span><text:span text:style-name="T2">(80/14) </text:span> ⲉⲧⲙⲙⲁⲩ· ϫⲉ ⲡⲏ ⲙⲉ̣[ <text:line-break/><text:span text:style-name="T1"> </text:span><text:span text:style-name="T2">(80/15) </text:span> ϣⲟⲣⲡ’ ⲛ ϣⲟⲟⲡ’ ⲁⲩⲱ̣ [ <text:line-break/><text:span text:style-name="T1"> </text:span><text:span text:style-name="T2">(80/16) </text:span> ⲕⲏ ϩⲓϫⲛ ⲛⲁⲓ̈ ⲧⲏⲣⲟⲩ ⲉ̣ϥ̣[ <text:line-break/><text:span text:style-name="T1"> </text:span><text:span text:style-name="T2">(80/17) </text:span> ϣⲟⲣⲡ’ ⲛ ϣⲟⲟⲡ’ ⲉⲩⲉⲓⲙ[ⲉ] <text:line-break/><text:span text:style-name="T1"> </text:span><text:span text:style-name="T2">(80/18) </text:span> ⲉⲣⲟϥ ⲛ ϣⲙⲧϭⲟⲙ· ⲡ̣ⲓ̣[ⲁ]‐ <text:line-break/><text:span text:style-name="T1"> </text:span><text:span text:style-name="T2">(80/19) </text:span> ϩⲟⲣⲁⲧⲟⲛ ⲙ ⲡ̅ⲛ̅ⲁ̅ ⲉⲙⲡϥ[ⲣ] <text:line-break/><text:span text:style-name="T1"> </text:span><text:span text:style-name="T2">(80/20) </text:span> ⲁⲧ’ⲉⲓⲙⲉ ⲣⲱ ⲉⲛⲉϩ· [ⲛⲉϥ]‐ <text:line-break/><text:span text:style-name="T1"> </text:span><text:span text:style-name="T2">(80/21) </text:span> ⲉⲓⲙⲉ ⲁⲗⲗⲁ ⲛⲉϥϣⲟ̣[ⲟⲡ’ ⲛ] <text:line-break/><text:span text:style-name="T1"> </text:span><text:span text:style-name="T2">(80/22) </text:span> ⲟⲩⲙⲛⲧ’ⲧⲉⲗⲓⲟⲥ̣ [ⲙⲛ ⲟⲩ]‐ <text:line-break/><text:span text:style-name="T1"> </text:span><text:span text:style-name="T2">(80/23) </text:span> ⲙⲛⲧ’ⲙⲁ[ⲕ]ⲁⲣⲓⲟⲥ·ʹ264 ⲧ[ <text:line-break/><text:span text:style-name="T1"> </text:span><text:span text:style-name="T2">(81/1) </text:span> [ⲛ]ⲧⲁⲥⲣ ⲁⲧ’ⲉⲓⲙⲉ [ <text:line-break/><text:span text:style-name="T1"> </text:span><text:span text:style-name="T2">(81/2) </text:span> ⲁⲩⲱ ⲉⲥϣ̣[ ]. <text:line-break/><text:span text:style-name="T1"> </text:span><text:span text:style-name="T2">(81/3) </text:span> ⲥ̣ⲱⲙⲁ ⲙⲛ ⲛ̣[ <text:line-break/><text:span text:style-name="T1"> </text:span><text:span text:style-name="T2">(81/4) </text:span> .ⲉⲣⲏⲧ ⲉ.[ <text:line-break/><text:span text:style-name="T1"> </text:span><text:span text:style-name="T2">(81/5) </text:span> [.]ⲟⲩⲟⲉⲓ̣ⲛ̣ [ <text:line-break/><text:span text:style-name="T1"> </text:span><text:span text:style-name="T2">(81/6) </text:span> [..]ⲥϣⲟ[ⲟⲡ’] ⲉⲕ.[ <text:line-break/><text:span text:style-name="T1"> </text:span><text:span text:style-name="T2">(81/7) </text:span> [.]ⲩ̣ⲗⲟⲉⲓ.[..]ⲓⲧⲉ ⲡ[.]ⲓⲕⲉ· ϩ[ⲓ]ⲛ̣ⲁ <text:line-break/><text:span text:style-name="T1"> </text:span><text:span text:style-name="T2">(81/8) </text:span> ϫⲉ ⲛⲛⲉⲥⲉⲓ ⲉⲃⲟⲗ ⲛϩⲟⲩⲟ <text:line-break/><text:span text:style-name="T1"> </text:span><text:span text:style-name="T2">(81/9) </text:span> [ⲁ]ⲩⲱ ⲛⲥϣⲱⲡⲉ ϩⲓ ⲡⲟⲩⲉ <text:line-break/><text:span text:style-name="T1"> </text:span><text:span text:style-name="T2">(81/10) </text:span> ⲛ̣ⲧⲉ ϯⲙⲛⲧ’ⲧⲉⲗⲓⲟⲥ· ⲁⲥ‐ <text:line-break/><text:span text:style-name="T1"> </text:span><text:span text:style-name="T2">(81/11) </text:span> ⲙ̣ⲙⲉ ⲉⲣⲟⲥ ⲙⲛ ⲡⲏ ⲉⲧⲙ‐ <text:line-break/><text:span text:style-name="T1"> </text:span><text:span text:style-name="T2">(81/12) </text:span> ⲙ̣ⲁⲩ̣· ⲁⲩⲱ ⲁⲥⲁϩⲉⲣⲁⲧⲥ <text:line-break/><text:span text:style-name="T1"> </text:span><text:span text:style-name="T2">(81/13) </text:span> [ϩⲱ]ⲱⲥ ⲁⲥⲟⲩⲱϣⲥ ⲉⲃⲟⲗ <text:line-break/><text:span text:style-name="T1"> </text:span><text:span text:style-name="T2">(81/14) </text:span> [ⲉⲧ]ⲃⲉ ⲡⲏ ⲉⲧⲙⲙⲁⲩ· ⲁⲩⲱ <text:line-break/><text:span text:style-name="T1"> </text:span><text:span text:style-name="T2">(81/15) </text:span> [ⲉ]ⲡⲓⲇⲏ ⲛⲉⲥϣⲟⲟⲡ’ ⲉⲃⲟⲗ <text:line-break/><text:span text:style-name="T1"> </text:span><text:span text:style-name="T2">(81/16) </text:span> [ϩⲙ ⲡ]ⲏ ⲉⲧ’ϣⲟⲟⲡ’ ⲟⲛⲧⲱⲥ <text:line-break/><text:span text:style-name="T1"> </text:span><text:span text:style-name="T2">(81/17) </text:span> [ⲛ]ⲉⲥϣⲟⲟⲡ’ ⲉⲃⲟⲗ ϩⲙ ⲡⲏ ⲉⲧ’ <text:line-break/><text:span text:style-name="T1"> </text:span><text:span text:style-name="T2">(81/18) </text:span> ϣⲟⲟⲡ’ ⲟⲛⲧⲱⲥ ⲙⲛ ⲛⲏ <text:line-break/><text:span text:style-name="T1"> </text:span><text:span text:style-name="T2">(81/19) </text:span> [ⲧ]ⲏⲣⲟⲩ ⲉⲥⲟⲩⲱⲛⲥ ⲁⲩⲱ <text:line-break/><text:span text:style-name="T1"> </text:span><text:span text:style-name="T2">(81/20) </text:span> [ⲥ]ⲥⲟⲩⲛ ⲡⲏ ⲉⲧⲣ ϣⲣⲡ’ ⲛ ϣⲟ‐ <text:line-break/><text:span text:style-name="T1"> </text:span><text:span text:style-name="T2">(81/21) </text:span> [ⲟ]ⲡ’· ⲉⲁⲩⲟⲩⲁϩⲟⲩ ⲛⲥⲱϥ <text:line-break/><text:span text:style-name="T1"> </text:span><text:span text:style-name="T2">(81/22) </text:span> ⲁⲩϣ̣ⲱ̣ⲡⲉ ⲉⲩϣⲟⲟⲡ’ {ⲁⲩ‐ <text:line-break/><text:span text:style-name="T1"> </text:span><text:span text:style-name="T2">(81/23) </text:span> ϣⲱ[ⲡ]ⲉ ⲉⲩϣⲟⲟⲡ’} ⲁⲩⲱ <text:line-break/><text:span text:style-name="T1"> </text:span><text:span text:style-name="T2">(81/24) </text:span> ⲉⲩⲟⲩⲟⲛϩ ⲉⲃ[ⲟⲗ] ϩⲓⲧⲛ ⲛⲏ <text:line-break/><text:span text:style-name="T1"> </text:span><text:span text:style-name="T2">(82/1) </text:span> [ⲉⲧⲣ ϣⲟⲣ]ⲡ’̣ ⲛ̣ [ϣ]ⲟ̣ⲟⲡ’· ⲁⲩⲱ <text:line-break/><text:soft-page-break/><text:span text:style-name="T1"> </text:span><text:span text:style-name="T2">(82/2) </text:span> .[........ ⲉ]ⲃ̣ⲟⲗϩⲓⲧⲛ ⲛⲓ̣‐[ <text:line-break/><text:span text:style-name="T1"> </text:span><text:span text:style-name="T2">(82/3) </text:span> [ ] ⲉⲁⲩⲟⲩⲱⲛ[ϩ] <text:line-break/><text:span text:style-name="T1"> </text:span><text:span text:style-name="T2">(82/4) </text:span> [ⲉⲃⲟⲗ ] ⲥⲛⲧⲉ ⲙ [ <text:line-break/><text:span text:style-name="T1"> </text:span><text:span text:style-name="T2">(82/5) </text:span> [ ] ⲁ̣ⲩⲟⲩⲱ̣[ⲛϩ <text:line-break/><text:span text:style-name="T1"> </text:span><text:span text:style-name="T2">(82/6) </text:span> [ⲉⲃⲟⲗ ....].[. ⲡ]ⲏ ⲉⲧ‐ <text:line-break/><text:span text:style-name="T1"> </text:span><text:span text:style-name="T2">(82/7) </text:span> ⲣ ϣⲟⲣⲡ’̣ ⲛ ⲉⲓⲙⲉ̣ ⲉⲣⲟϥ ⲉⲩ‐ <text:line-break/><text:span text:style-name="T1"> </text:span><text:span text:style-name="T2">(82/8) </text:span> ⲭⲱⲣⲏⲙⲁ ⲡⲉ ⲛ ϣⲁ ⲉⲛⲉϩ· <text:line-break/><text:span text:style-name="T1"> </text:span><text:span text:style-name="T2">(82/9) </text:span> ⲉⲁϥϣⲱⲡⲉ ⲛ ⲟⲩⲙⲉ[ϩ]‐ <text:line-break/><text:span text:style-name="T1"> </text:span><text:span text:style-name="T2">(82/10) </text:span> ⲥⲛⲧⲉ ⲛⲧⲉ ⲧⲉϥⲅⲛⲱⲥⲓⲥ <text:line-break/><text:span text:style-name="T1"> </text:span><text:span text:style-name="T2">(82/11) </text:span> ⲡⲁⲗⲓⲛ ⲟⲛ ϯⲅⲛⲱⲥⲓⲥ ⲛⲧ̣[ⲉ] <text:line-break/><text:span text:style-name="T1"> </text:span><text:span text:style-name="T2">(82/12) </text:span> ⲧⲉϥⲅⲛⲱⲥⲓⲥ ⲉⲧⲉ ⲡⲓⲕ̅ⲗ̣̅̅[̅ⲥ̅] <text:line-break/><text:span text:style-name="T1"> </text:span><text:span text:style-name="T2">(82/13) </text:span> ⲡⲉ ⲛⲛ ⲁⲧⲙⲓⲥⲉ· ⲁⲩⲱ [ⲡⲓ̅] <text:line-break/><text:span text:style-name="T1"> </text:span><text:span text:style-name="T2">(82/14) </text:span> ⲟⲛⲧⲱⲥ ⲉⲧ[ϣⲟⲟⲡ’̣ ⲟ[ⲛ ⲁⲩ]‐ <text:line-break/><text:span text:style-name="T1"> </text:span><text:span text:style-name="T2">(82/15) </text:span> ⲁϩⲉⲣⲁⲧⲟⲩ ϩⲓϫⲙ ⲡⲁⲓ̈· [ⲉ]‐ <text:line-break/><text:span text:style-name="T1"> </text:span><text:span text:style-name="T2">(82/16) </text:span> ⲧⲃⲉ ⲡⲁⲓ̈ ⲅⲁⲣ ⲁⲥⲥⲟⲩ̣[ⲱⲛϥ] <text:line-break/><text:span text:style-name="T1"> </text:span><text:span text:style-name="T2">(82/17) </text:span> ϩⲓⲛⲁ ϫⲉ ⲉⲣⲉⲛⲏ ⲉⲧⲟⲩⲏ[ϩ] <text:line-break/><text:span text:style-name="T1"> </text:span><text:span text:style-name="T2">(82/18) </text:span> ⲛⲥⲱⲥ ϣⲱⲡⲉ ⲉⲩⲛⲧⲁ̣[ⲩ] <text:line-break/><text:span text:style-name="T1"> </text:span><text:span text:style-name="T2">(82/19) </text:span> ⲛ ⲟⲩⲧⲟⲡⲟⲥ ⲁⲩⲱ ⲛⲥⲉ̣‐ <text:line-break/><text:span text:style-name="T1"> </text:span><text:span text:style-name="T2">(82/20) </text:span> ϣⲧⲙⲣ ϣⲟⲣⲡ’ ⲉⲣⲟⲥ ⲛ[ϭⲓ] <text:line-break/><text:span text:style-name="T1"> </text:span><text:span text:style-name="T2">(82/21) </text:span> ⲛⲏ ⲉⲧⲛⲏⲩ ⲉⲃⲟⲗ [ⲁ]ⲗ̣ⲗⲁ̣ <text:line-break/><text:span text:style-name="T1"> </text:span><text:span text:style-name="T2">(82/22) </text:span> ⲛⲥⲉϣⲱⲡⲉ ⲉⲩ̣[ⲟ]ⲩⲁⲁⲃ <text:line-break/><text:span text:style-name="T1"> </text:span><text:span text:style-name="T2">(82/23) </text:span> ⲛ ϩⲁⲡⲗⲟⲩⲛ· ϯⲕ̣ⲁ̣ⲧⲁ‐ <text:line-break/><text:span text:style-name="T1"> </text:span><text:span text:style-name="T2">(82/24) </text:span> ⲛⲟⲏⲥⲓ̣[ⲥ ⲧ]ⲉ ⲛⲧⲉ ⲡⲛⲟ̣ⲩ‐ <text:line-break/><text:span text:style-name="T1"> </text:span><text:span text:style-name="T2">(83/1) </text:span> [ⲧ]ⲉ ⲉⲧⲣ ϣ̣ⲣ̣ⲡ’ ⲛ ϣ̣[ⲟⲟⲡ’· ⲁⲥ]‐ <text:line-break/><text:span text:style-name="T1"> </text:span><text:span text:style-name="T2">(83/2) </text:span> ⲟⲩⲱϣⲥ ⲉ[ⲃⲟⲗ <text:line-break/><text:span text:style-name="T1"> </text:span><text:span text:style-name="T2">(83/3) </text:span> ⲉ ⲡⲓϩⲁⲡⲗⲟⲩ̣[ⲛ <text:line-break/><text:span text:style-name="T1"> </text:span><text:span text:style-name="T2">(83/4) </text:span> ⲛ̣ ⲟⲩⲟⲩϫⲁⲓ̈ [ <text:line-break/><text:span text:style-name="T1"> </text:span><text:span text:style-name="T2">(83/5) </text:span> [.] ⲟ̣ⲩⲟⲩϫⲁⲓ̈ [ <text:line-break/><text:span text:style-name="T1"> </text:span><text:span text:style-name="T2">(83/6) </text:span> [..].. ⲡ̣ⲏ ⲙⲉ̣ⲛ̣ .[ <text:line-break/><text:span text:style-name="T1"> </text:span><text:span text:style-name="T2">(83/7) </text:span> [...ⲟ]ⲩⲟⲉⲓⲛ ⲉⲧ̣[ⲟ]ⲩⲣ ϣ[ⲣ]ⲡ’ <text:line-break/><text:span text:style-name="T1"> </text:span><text:span text:style-name="T2">(83/8) </text:span> [ⲛ ⲉⲓⲙ]ⲉ ⲉⲣⲟϥ ⲁⲩⲙ̣ⲟ̣ⲩⲧⲉ ⲉⲣⲟⲥ <text:line-break/><text:span text:style-name="T1"> </text:span><text:span text:style-name="T2">(83/9) </text:span> [ϫⲉ] ϯⲃⲁ̅ⲣ̅ⲃ̅ⲏ̣̅̅ⲗ̅ⲱ̅ ⲉⲃⲟⲗ ϩⲓⲧⲛ <text:line-break/><text:span text:style-name="T1"> </text:span><text:span text:style-name="T2">(83/10) </text:span> [ϯ]ⲉⲛⲛⲟⲓⲁ· ϯϣⲙⲧ’ⲅⲉ‐ <text:line-break/><text:span text:style-name="T1"> </text:span><text:span text:style-name="T2">(83/11) </text:span> [ⲛⲟⲥ] ⲛ ϩⲟⲟⲩⲧ’ ⲙ ⲡⲁⲣⲑⲉⲛⲟⲥ <text:line-break/><text:span text:style-name="T1"> </text:span><text:span text:style-name="T2">(83/12) </text:span> [ⲛ ⲧ]ⲉ̣ⲗⲓⲟⲥ· ϯⲅⲛⲱⲥⲓⲥ ⲇⲉ <text:line-break/><text:span text:style-name="T1"> </text:span><text:span text:style-name="T2">(83/13) </text:span> [ⲛⲧⲉ] ⲧⲁⲓ̈ ⲧⲏ ⲉⲧⲁⲥϣⲱⲡⲉ <text:line-break/><text:span text:style-name="T1"> </text:span><text:span text:style-name="T2">(83/14) </text:span> [ⲉⲃⲟ]ⲗ̣ ϩⲓⲧⲟⲟⲧⲥ ϫⲉ ⲛⲛⲟⲩ‐ <text:line-break/><text:span text:style-name="T1"> </text:span><text:span text:style-name="T2">(83/15) </text:span> [.]ⲟ̣ⲕⲥ ⲉ ⲡⲉⲥⲏⲧ’· ⲁⲩⲱ ϫⲉ <text:line-break/><text:span text:style-name="T1"> </text:span><text:span text:style-name="T2">(83/16) </text:span> [ⲛ]ⲛⲉⲥⲉⲓ ⲉⲃⲟⲗ ⲛϩⲟⲩⲟ ⲉ‐ <text:line-break/><text:span text:style-name="T1"> </text:span><text:span text:style-name="T2">(83/17) </text:span> ⲃⲟⲗ ϩⲓⲧⲛ ⲛⲏ ⲉⲧ’ϣⲟⲟⲡ’ <text:line-break/><text:span text:style-name="T1"> </text:span><text:span text:style-name="T2">(83/18) </text:span> [ⲛ]ϩⲏⲧⲥ ⲙⲛ ⲛⲏ ⲉⲧⲟⲩⲏϩ <text:line-break/><text:span text:style-name="T1"> </text:span><text:span text:style-name="T2">(83/19) </text:span> ⲛⲥⲱⲥ· ⲁⲗⲗⲁ ⲉⲥϣⲟⲟⲡ’ <text:line-break/><text:span text:style-name="T1"> </text:span><text:span text:style-name="T2">(83/20) </text:span> ⲛ ϩⲁⲡⲗⲟⲩⲛ ϫⲉ ⲉⲥⲉϭⲙ <text:line-break/><text:span text:style-name="T1"> </text:span><text:span text:style-name="T2">(83/21) </text:span> [ϭ]ⲟⲙ ⲉ ⲥⲟⲩⲱⲛ ⲡⲛⲟⲩⲧⲉ <text:line-break/><text:span text:style-name="T1"> </text:span><text:span text:style-name="T2">(83/22) </text:span> ⲉⲧ̣[ⲣ] ϣⲣⲡ’ ⲛ ϣⲟⲟⲡ’ ϫⲉ <text:line-break/><text:span text:style-name="T1"> </text:span><text:span text:style-name="T2">(83/23) </text:span> ⲁⲥ[ϣ]ⲱⲡⲉ ⲉⲛⲁⲛⲟⲩⲥ ⲛ‐ <text:line-break/><text:span text:style-name="T1"> </text:span><text:span text:style-name="T2">(83/24) </text:span> ⲧⲉ ⲡⲏ ⲉⲧⲙⲙ[ⲁ]ⲩ ⲉⲁⲥⲟⲩ‐ <text:line-break/><text:soft-page-break/><text:span text:style-name="T1"> </text:span><text:span text:style-name="T2">(83/25) </text:span> [.......]..[...] ⲉⲃⲟⲗ ⲛ <text:line-break/><text:span text:style-name="T1"> </text:span><text:span text:style-name="T2">(84/1) </text:span> [.....ⲟ]ⲩ̣ⲙⲛⲧⲁⲧ’ⲙⲓⲥ[ⲉ] <text:line-break/><text:span text:style-name="T1"> </text:span><text:span text:style-name="T2">(84/2) </text:span> [ ⲙ]ⲉϩϣⲟⲙⲧ’ <text:line-break/><text:span text:style-name="T1"> </text:span><text:span text:style-name="T2">(84/3) </text:span> .[........]. ⲥⲛⲁⲩ ⲛ̣ ⲇⲓⲁ‐ <text:line-break/><text:span text:style-name="T1"> </text:span><text:span text:style-name="T2">(84/4) </text:span> [........]ⲧ’ ⲛ ⲧⲉ̣[ⲓ̈]ϩⲉ .[ <text:line-break/><text:span text:style-name="T1"> </text:span><text:span text:style-name="T2">(84/5) </text:span> .[.....ϩⲟ]ⲟ̣ⲩⲧ’ ⲇⲉ̣ ..[ <text:line-break/><text:span text:style-name="T1"> </text:span><text:span text:style-name="T2">(84/6) </text:span> ⲣ̣ [.......].ⲉⲛ[ <text:line-break/><text:span text:style-name="T1"> </text:span><text:span text:style-name="T2">(84/7) </text:span> ⲣ[..] ⲛ ⲛⲉ̣[..]ⲛ ⲙⲛ ϯⲙ̣[ <text:line-break/><text:span text:style-name="T1"> </text:span><text:span text:style-name="T2">(84/8) </text:span> ⲧⲉ ⲙ ⲙ[ⲛ]ⲧ’ⲁ̣ⲧ’ⲙⲓⲥ[ⲉ <text:line-break/><text:span text:style-name="T1"> </text:span><text:span text:style-name="T2">(84/9) </text:span> ⲥⲓⲥ ⲧⲉ ⲟⲩⲙ̣ⲉϩ̣ⲥⲛⲧⲉ ⲛ[ <text:line-break/><text:span text:style-name="T1"> </text:span><text:span text:style-name="T2">(84/10) </text:span> ⲕⲱⲛ̣ .ⲁⲥⲁϩⲉⲣⲁⲧⲥ [ <text:line-break/><text:span text:style-name="T1"> </text:span><text:span text:style-name="T2">(84/11) </text:span> ϣⲟⲣⲡ’ ⲛⲧⲉ ⲡⲓⲟⲛⲧⲱ[ⲥ ⲉⲧ]‐ <text:line-break/><text:span text:style-name="T1"> </text:span><text:span text:style-name="T2">(84/12) </text:span> ϣⲟⲟⲡ’ ⲟⲛⲧⲱⲥ ⲛ ⲕ[ <text:line-break/><text:span text:style-name="T1"> </text:span><text:span text:style-name="T2">(84/13) </text:span> ⲧⲉ ϯⲙⲛⲧ’ⲙⲁⲕⲁⲣⲓⲟ[ⲥ <text:line-break/><text:span text:style-name="T1"> </text:span><text:span text:style-name="T2">(84/14) </text:span> ⲛⲧⲉ ⲡⲓⲁϩⲟⲣⲁⲧⲟⲛ ⲙ ⲡ̅[̅ⲛ̅ⲁ̅ <text:line-break/><text:span text:style-name="T1"> </text:span><text:span text:style-name="T2">(84/15) </text:span> ϯⲅⲛⲱⲥⲓⲥ ⲛⲧⲉ ϯϣⲟⲣ[ⲡ’] <text:line-break/><text:span text:style-name="T1"> </text:span><text:span text:style-name="T2">(84/16) </text:span> ⲛ ϩⲩⲡⲁⲣⲝⲓⲥ ⲛϩⲣⲁⲓ̈ ϩⲛ ϯ‐ <text:line-break/><text:span text:style-name="T1"> </text:span><text:span text:style-name="T2">(84/17) </text:span> ⲙⲛⲧ’ϩⲁⲡⲗⲟⲩⲥ ⲛⲧⲉ ⲡⲓ[ⲁ]‐ <text:line-break/><text:span text:style-name="T1"> </text:span><text:span text:style-name="T2">(84/18) </text:span> ⲧⲛⲁⲩ ⲉⲣⲟϥ ⲙ ⲡ̅ⲛ̅ⲁ̅ ⲛ ϩⲣⲁⲓ̣̈ <text:line-break/><text:span text:style-name="T1"> </text:span><text:span text:style-name="T2">(84/19) </text:span> ϩⲛ ϯϩⲉⲛⲛⲁⲥ̣ ⲉϥⲉⲓⲛⲉ ⲛ‐ <text:line-break/><text:span text:style-name="T1"> </text:span><text:span text:style-name="T2">(84/20) </text:span> ϩⲣⲁⲓ̈ ϩⲛ ϯⲙⲛⲧ’ⲟⲩⲱⲧ’̣ ⲧ[ⲏ] <text:line-break/><text:span text:style-name="T1"> </text:span><text:span text:style-name="T2">(84/21) </text:span> ⲉⲧ’ⲧⲟⲩⲃⲏⲩ ⲁⲩⲱ̣ [.]ⲁ[ <text:line-break/><text:span text:style-name="T1"> </text:span><text:span text:style-name="T2">(84/22) </text:span> ⲉⲓⲇⲟⲥ· [ⲁ]ⲩⲱ ϥϣ̣[ⲟ]ⲟ̣ⲡ’̣ <text:line-break/><text:span text:style-name="T1"> </text:span><text:span text:style-name="T2">(84/23) </text:span> ⲛϭⲓ ⲡⲏ ⲉⲧ̣[ <text:line-break/><text:span text:style-name="T1"> </text:span><text:span text:style-name="T2">(85/1) </text:span> [ <text:line-break/><text:span text:style-name="T1"> </text:span><text:span text:style-name="T2">(85/2) </text:span> [ <text:line-break/><text:span text:style-name="T1"> </text:span><text:span text:style-name="T2">(85/3) </text:span> [ <text:line-break/><text:span text:style-name="T1"> </text:span><text:span text:style-name="T2">(85/4) </text:span> [ <text:line-break/><text:span text:style-name="T1"> </text:span><text:span text:style-name="T2">(85/5) </text:span> [ <text:line-break/><text:span text:style-name="T1"> </text:span><text:span text:style-name="T2">(85/6) </text:span> [ ]..[...].· <text:line-break/><text:span text:style-name="T1"> </text:span><text:span text:style-name="T2">(85/7) </text:span> [ ]ⲉ̣ⲓⲙⲉ ⲇⲉ <text:line-break/><text:span text:style-name="T1"> </text:span><text:span text:style-name="T2">(85/8) </text:span> [ ] ⲙⲛ ϯⲙⲛⲧ‐ <text:line-break/><text:span text:style-name="T1"> </text:span><text:span text:style-name="T2">(85/9) </text:span> [..... ⲁ]ⲩⲱ ϯ[ⲙⲛⲧ’ⲧⲉ]ⲗⲓⲟⲥ <text:line-break/><text:span text:style-name="T1"> </text:span><text:span text:style-name="T2">(85/10) </text:span> [...ⲉ]ⲛⲉⲣⲅⲓ ⲇⲉ [ⲙⲙ]ⲟ̣ϥ ⲁⲩⲱ <text:line-break/><text:span text:style-name="T1"> </text:span><text:span text:style-name="T2">(85/11) </text:span> [....]ⲕϥ ⲡⲓϣⲟⲣⲡ’̣ ⲛ ⲕ̅ⲗ̅ⲥ̅ <text:line-break/><text:span text:style-name="T1"> </text:span><text:span text:style-name="T2">(85/12) </text:span> [....]ⲧⲉ ⲛⲧⲟⲟⲩ ⲧⲏⲣⲟⲩ ϯ‐ <text:line-break/><text:span text:style-name="T1"> </text:span><text:span text:style-name="T2">(85/13) </text:span> [ϩⲩⲡ]ⲁⲣⲝⲓⲥ ⲙⲛ ϯⲉⲛⲉⲣⲅⲓⲁ <text:line-break/><text:span text:style-name="T1"> </text:span><text:span text:style-name="T2">(85/14) </text:span> ϯ̣[ⲙ]ⲛⲧ’ⲛⲟⲩⲧⲉ ⲡⲓⲅⲉⲛⲟⲥ <text:line-break/><text:span text:style-name="T1"> </text:span><text:span text:style-name="T2">(85/15) </text:span> ⲁⲩⲱ ⲡⲓⲉⲓⲇⲟⲥ· ⲛⲓϭⲟⲙ ⲇⲉ <text:line-break/><text:span text:style-name="T1"> </text:span><text:span text:style-name="T2">(85/16) </text:span> ⲟ̣ⲩⲁ ⲛⲉ ⲁⲩⲱ ⲛϩⲣⲁⲓ̈ ϩⲛ ⲟⲩ‐ <text:line-break/><text:span text:style-name="T1"> </text:span><text:span text:style-name="T2">(85/17) </text:span> [ⲁ] ϫ̣ⲉ ϥⲉ ⲛ ⲟⲩⲁ· ⲉⲧⲉ ⲡⲁⲓ̈ ⲡⲉ <text:line-break/><text:span text:style-name="T1"> </text:span><text:span text:style-name="T2">(85/18) </text:span> ⲛⲟⲩⲙⲉⲣⲓⲕⲟⲛ ⲁⲛ ⲁⲗⲗⲁ <text:line-break/><text:span text:style-name="T1"> </text:span><text:span text:style-name="T2">(85/19) </text:span> ⲛⲏ ⲛⲧⲉ ⲡⲧ̣[ⲏⲣ]ϥ· ʹ264 ϫⲉ ⲟⲩ <text:line-break/><text:span text:style-name="T1"> </text:span><text:span text:style-name="T2">(85/20) </text:span> ⲡ̣ⲉ ⲡⲓⲟⲩⲁ ⲉⲧⲉ ϯϩⲉ[ⲛ]ⲛⲁⲥ <text:line-break/><text:span text:style-name="T1"> </text:span><text:span text:style-name="T2">(85/21) </text:span> ⲧⲉ ⲁ[ⲩ]ⲱ ⲉⲃⲟ̣ⲗ̣ ϩⲓⲧⲛ ϯⲉⲛⲉⲣ‐ <text:line-break/><text:span text:style-name="T1"> </text:span><text:span text:style-name="T2">(85/22) </text:span> ⲅⲓⲁ [..]ⲁ̣ⲥ[....]ⲙ̣ⲛⲧ’ⲱⲛϩ <text:line-break/><text:span text:style-name="T1"> </text:span><text:span text:style-name="T2">(85/23) </text:span> ⲙⲛ̣[....].[....] ⲡⲉ ⲛⲧⲉ <text:line-break/><text:soft-page-break/><text:span text:style-name="T1"> </text:span><text:span text:style-name="T2">(85/24) </text:span> [ ]ⲧⲏⲣϥ ⲇⲉ <text:line-break/><text:span text:style-name="T1"> </text:span><text:span text:style-name="T2">(86/1) </text:span> [ <text:line-break/><text:span text:style-name="T1"> </text:span><text:span text:style-name="T2">(86/2) </text:span> [ <text:line-break/><text:span text:style-name="T1"> </text:span><text:span text:style-name="T2">(86/3) </text:span> .[ <text:line-break/><text:span text:style-name="T1"> </text:span><text:span text:style-name="T2">(86/4) </text:span> ⲡ[ <text:line-break/><text:span text:style-name="T1"> </text:span><text:span text:style-name="T2">(86/5) </text:span> [ <text:line-break/><text:span text:style-name="T1"> </text:span><text:span text:style-name="T2">(86/6) </text:span> ⲃ[ <text:line-break/><text:span text:style-name="T1"> </text:span><text:span text:style-name="T2">(86/7) </text:span> ⲉ̣[ <text:line-break/><text:span text:style-name="T1"> </text:span><text:span text:style-name="T2">(86/8) </text:span> ϭⲟ̣ⲙ ⲁ[ <text:line-break/><text:span text:style-name="T1"> </text:span><text:span text:style-name="T2">(86/9) </text:span> ⲧⲉ ⲙ ⲡⲣⲏ̣[ⲧⲉ <text:line-break/><text:span text:style-name="T1"> </text:span><text:span text:style-name="T2">(86/10) </text:span> ⲡⲁⲣ[.....]ⲉⲥⲑⲏ̣[ⲧⲟⲛ <text:line-break/><text:span text:style-name="T1"> </text:span><text:span text:style-name="T2">(86/11) </text:span> ⲙⲉⲛ .[.ⲡ]ⲁⲛⲧⲉⲗⲓ[ⲟⲥ <text:line-break/><text:span text:style-name="T1"> </text:span><text:span text:style-name="T2">(86/12) </text:span> ⲙⲁⲩ ⲉⲁⲥ̣ϫⲟⲟⲥ ⲉⲥⲟ̣[ <text:line-break/><text:span text:style-name="T1"> </text:span><text:span text:style-name="T2">(86/13) </text:span> ϫⲉ ⲛⲧⲕⲟⲩⲛⲟϭ ⲁ̅ⲫ̅ⲣ̅[̅ⲏ̅ⲇ̅ⲱ̅ⲛ̅] <text:line-break/><text:span text:style-name="T1"> </text:span><text:span text:style-name="T2">(86/14) </text:span> ⲛⲧⲕⲟⲩⲧⲉⲗⲓⲟⲥ ⲛ̅ⲉ̅ⲫ̅[̅ⲣ̅ⲏ̅ⲇ̅ⲱ̅ⲛ̅] <text:line-break/><text:span text:style-name="T1"> </text:span><text:span text:style-name="T2">(86/15) </text:span> ⲉⲥϫⲱ ⲙⲙⲟⲥ ⲉ ⲧⲉϥϩⲩⲡ̣[ⲁ]ⲣ̣‐ <text:line-break/><text:span text:style-name="T1"> </text:span><text:span text:style-name="T2">(86/16) </text:span> ⲝⲓⲥ ϫⲉ ⲛⲧⲕⲟⲩⲛⲟϭ ⲇ̅ⲏ̅ⲓ̅̈̅ⲫ̅ⲁ̅[ <text:line-break/><text:span text:style-name="T1"> </text:span><text:span text:style-name="T2">(86/17) </text:span> ϯⲉⲛⲉⲣⲅⲓⲁ ⲛⲧⲁϥ ⲙⲛ ⲟⲩⲱⲛ̣[ϩ] <text:line-break/><text:span text:style-name="T1"> </text:span><text:span text:style-name="T2">(86/18) </text:span> ⲁⲩⲱ ⲟⲩⲙⲛⲧ’ⲛⲟⲩⲧⲉ ⲧ̣[ⲉ] <text:line-break/><text:span text:style-name="T1"> </text:span><text:span text:style-name="T2">(86/19) </text:span> ⲛⲧⲕⲟⲩⲛⲟϭ ϩ̅ⲁ̅ⲣ̅ⲙ̅ⲏ̅ⲇ̅ⲱ̅[̅ⲛ̅ <text:line-break/><text:span text:style-name="T1"> </text:span><text:span text:style-name="T2">(86/20) </text:span> ⲡⲁⲛⲓⲉⲟⲟⲩ [ⲧ]ⲏ̣[ⲣ]ⲟⲩ ⲉ̅ⲡ̅ⲓ̅ⲫ̅[̅ⲁ̅ <text:line-break/><text:span text:style-name="T1"> </text:span><text:span text:style-name="T2">(86/21) </text:span> ⲧⲉϥⲙⲛⲧ’ⲙ̣[ⲁ]ⲕⲁⲣⲓ[ⲟⲥ ⲇⲉ ⲙⲛ̣ <text:line-break/><text:span text:style-name="T1"> </text:span><text:span text:style-name="T2">(86/22) </text:span> ϯⲙⲛⲧ’ⲧⲉⲗ[ⲓⲟ]ⲥ ⲛ[ⲧⲉ] ϯⲙⲛⲧ‐ <text:line-break/><text:span text:style-name="T1"> </text:span><text:span text:style-name="T2">(86/23) </text:span> ⲟⲩⲱⲧ’· .[...]ⲁ̣ⲟ[..]ⲟ̣ⲩ ⲟ̣[ⲩ <text:line-break/><text:span text:style-name="T1"> </text:span><text:span text:style-name="T2">(86/24) </text:span> ⲧⲏⲣϥ ϩⲓ ⲟ[ <text:line-break/><text:span text:style-name="T1"> </text:span><text:span text:style-name="T2">(87/1) </text:span> [ ] <text:line-break/><text:span text:style-name="T1"> </text:span><text:span text:style-name="T2">(87/2) </text:span> [ ]ⲁ̣ <text:line-break/><text:span text:style-name="T1"> </text:span><text:span text:style-name="T2">(87/3) </text:span> [ ] <text:line-break/><text:span text:style-name="T1"> </text:span><text:span text:style-name="T2">(87/4) </text:span> [ ] <text:line-break/><text:span text:style-name="T1"> </text:span><text:span text:style-name="T2">(87/5) </text:span> [ ] <text:line-break/><text:span text:style-name="T1"> </text:span><text:span text:style-name="T2">(87/6) </text:span> [ ]ⲁ̣ <text:line-break/><text:span text:style-name="T1"> </text:span><text:span text:style-name="T2">(87/7) </text:span> [ ]. ϣⲁ ⲉⲛ̣ⲉϩ <text:line-break/><text:span text:style-name="T1"> </text:span><text:span text:style-name="T2">(87/8) </text:span> [.......].[...] ⲛ ⲛⲟⲉ̣ⲣ̣ⲟⲛ <text:line-break/><text:span text:style-name="T1"> </text:span><text:span text:style-name="T2">(87/9) </text:span> [......]ⲉϩⲛ[..].[ⲧⲉⲗ]ⲓ̣ⲟⲥ <text:line-break/><text:span text:style-name="T1"> </text:span><text:span text:style-name="T2">(87/10) </text:span> [ϯ ⲃ̅ⲁ̅ⲣ̅ⲃ̅]̅ⲏ̅ⲗ̅ⲱ̅ ⲙ ⲡ̣[ⲁⲣⲑⲉ]ⲛⲟⲥ <text:line-break/><text:span text:style-name="T1"> </text:span><text:span text:style-name="T2">(87/11) </text:span> [ⲉⲃⲟⲗ] ϩⲓⲧⲟⲟⲧⲥ ⲛ̣ ϯⲙⲛⲧ’ϩⲁ‐ <text:line-break/><text:span text:style-name="T1"> </text:span><text:span text:style-name="T2">(87/12) </text:span> [ⲡⲗⲟ]ⲩⲥ ⲛⲧⲉ ϯⲙⲛⲧ’ⲙⲁⲕⲁ‐ <text:line-break/><text:span text:style-name="T1"> </text:span><text:span text:style-name="T2">(87/13) </text:span> [ⲣⲓⲟⲥ] ⲛⲧⲉ ⲡⲓϣⲙⲧ’ϭⲟⲙ ⲛ <text:line-break/><text:span text:style-name="T1"> </text:span><text:span text:style-name="T2">(87/14) </text:span> [ⲁϩⲟ]ⲣⲁⲧ[ⲟ]ⲛ ⲙ ⲡ̅ⲛ̅ⲁ̅· ⲧⲏ ⲉ‐ <text:line-break/><text:span text:style-name="T1"> </text:span><text:span text:style-name="T2">(87/15) </text:span> ⲧⲁⲥⲉⲓⲙⲉ ⲉ ⲡⲏ ⲉⲧⲙⲙⲁⲩ <text:line-break/><text:span text:style-name="T1"> </text:span><text:span text:style-name="T2">(87/16) </text:span> ⲁ̣ⲥⲉⲓⲙⲉ ⲉⲣⲟⲥ· ⲡⲏ ⲇⲉ ⲉϥⲉ <text:line-break/><text:span text:style-name="T1"> </text:span><text:span text:style-name="T2">(87/17) </text:span> ⲛ̣ ⲟⲩⲁ ⲛⲥⲁ ⲥ̣ⲁ ⲛⲓⲙ ⲉϥⲉ ⲛ‐ <text:line-break/><text:span text:style-name="T1"> </text:span><text:span text:style-name="T2">(87/18) </text:span> ⲛ̣ ⲁⲧ’ⲡⲱⲣϫ ⲉⲣⲟϥ ⲉⲁϥⲛ <text:line-break/><text:span text:style-name="T1"> </text:span><text:span text:style-name="T2">(87/19) </text:span> [..]. ⲁ̣ϥϩⲟ[..]ⲟ̣ⲥ ⲛⲥⲉ[ⲓ]ⲙⲉ <text:line-break/><text:span text:style-name="T1"> </text:span><text:span text:style-name="T2">(87/20) </text:span> [ⲉⲣⲟⲥ ⲉ]ⲩⲉ̣ⲛⲉⲣⲅⲓⲁ ⲛⲧⲁϥ <text:line-break/><text:span text:style-name="T1"> </text:span><text:span text:style-name="T2">(87/21) </text:span> [ⲧⲉ...]ⲉⲧ[.] ⲛϥⲉⲓⲙⲉ ⲉ <text:line-break/><text:span text:style-name="T1"> </text:span><text:span text:style-name="T2">(87/22) </text:span> [.....]ⲟ̣[....] ⲉⲩⲉⲓⲙⲉ <text:line-break/><text:soft-page-break/><text:span text:style-name="T1"> </text:span><text:span text:style-name="T2">(87/23) </text:span> [.........] ⲛ̣ϩⲣⲁⲓ̈ ϩⲛ ⲕⲉ‐ <text:line-break/><text:span text:style-name="T1"> </text:span><text:span text:style-name="T2">(88/1) </text:span> [ <text:line-break/><text:span text:style-name="T1"> </text:span><text:span text:style-name="T2">(88/2) </text:span> [ <text:line-break/><text:span text:style-name="T1"> </text:span><text:span text:style-name="T2">(88/3) </text:span> [ <text:line-break/><text:span text:style-name="T1"> </text:span><text:span text:style-name="T2">(88/4) </text:span> ⲗ <text:line-break/><text:span text:style-name="T1"> </text:span><text:span text:style-name="T2">(88/5) </text:span> .[ <text:line-break/><text:span text:style-name="T1"> </text:span><text:span text:style-name="T2">(88/6) </text:span> ϩ̣[ <text:line-break/><text:span text:style-name="T1"> </text:span><text:span text:style-name="T2">(88/7) </text:span> ⲉ̣[ <text:line-break/><text:span text:style-name="T1"> </text:span><text:span text:style-name="T2">(88/8) </text:span> ⲙ[ <text:line-break/><text:span text:style-name="T1"> </text:span><text:span text:style-name="T2">(88/9) </text:span> ⲥⲙⲟⲩ ⲉ̣[ <text:line-break/><text:span text:style-name="T1"> </text:span><text:span text:style-name="T2">(88/10) </text:span> ϫⲉ .[.].ⲃ̅ⲏ̅[̅ⲣ̅]̅ⲓ̣̅̅[̅ⲑ̅ⲉ̅ⲩ̅ ⲉⲣⲓⲅⲉⲛⲁⲟⲡ <text:line-break/><text:span text:style-name="T1"> </text:span><text:span text:style-name="T2">(88/11) </text:span> ⲱ̅ⲣ̅[ⲓⲙⲉⲛⲓ]ⲉ· ⲁ̅ⲣ̅[̅ⲁ̅ⲙ̅ⲉ̅ⲛ̅] <text:line-break/><text:span text:style-name="T1"> </text:span><text:span text:style-name="T2">(88/12) </text:span> ⲁⲗⲫⲗ[ⲉⲅ]ⲉ· ⲏ̅ⲗ̅ⲓ̅ⲗ̅ⲓ̅ⲟ̣̅̅[ⲩⲫⲉⲩ] <text:line-break/><text:span text:style-name="T1"> </text:span><text:span text:style-name="T2">(88/13) </text:span> ⲗ̅ⲁ̅ⲗ̅ⲁ̅ⲙ̅ⲉ̅ⲩ̅· ⲛ̅ⲟⲏⲑⲉⲩ̣̅[ <text:line-break/><text:span text:style-name="T1"> </text:span><text:span text:style-name="T2">(88/14) </text:span> ⲟⲩⲛⲟϭ ⲡⲉ ⲡⲉⲕⲣⲁⲛ ⲁ[ <text:line-break/><text:span text:style-name="T1"> </text:span><text:span text:style-name="T2">(88/15) </text:span> ϥϫⲟⲟⲣ· ⲡⲏ ⲉⲧ’[ⲉ]ⲓ̣ⲙⲉ̣ [ⲉ]‐ <text:line-break/><text:span text:style-name="T1"> </text:span><text:span text:style-name="T2">(88/16) </text:span> ϥⲓⲙⲉ ⲉ ⲛⲁⲓ̈ ⲧⲏⲣⲟⲩ· ⲛⲧ[ⲕ]‐ <text:line-break/><text:span text:style-name="T1"> </text:span><text:span text:style-name="T2">(88/17) </text:span> ⲟⲩⲁ ⲛⲧⲕⲟⲩⲁ ⲥ̣ⲓ̅ⲟ̅ⲩ̅ ⲉ̅.̅[ <text:line-break/><text:span text:style-name="T1"> </text:span><text:span text:style-name="T2">(88/18) </text:span> ⲁ̅ⲫ̅ⲣ̅ⲏ̅ⲇ̅ⲱ̅ⲛ̅ ⲛⲧⲟⲕ ⲡⲉ ⲡ[ⲓⲉ]‐ <text:line-break/><text:span text:style-name="T1"> </text:span><text:span text:style-name="T2">(88/19) </text:span> ⲱⲛ ⲛⲧⲉ ⲛⲓⲉ̣ⲱⲛ ⲛⲧⲉ ⲡ[ⲓ]‐ <text:line-break/><text:span text:style-name="T1"> </text:span><text:span text:style-name="T2">(88/20) </text:span> ⲛⲟϭ ⲛ ⲧⲉⲗ[ⲓⲟ]ⲥ̣ ⲡⲓϣ[ⲟⲣ]ⲡ̣ <text:line-break/><text:span text:style-name="T1"> </text:span><text:span text:style-name="T2">(88/21) </text:span> ⲛ ⲕ̅ⲗ̅ⲥ̣̅̅ ⲛⲧⲉ ϯ[ⲙ]ⲉϩ.[ <text:line-break/><text:span text:style-name="T1"> </text:span><text:span text:style-name="T2">(88/22) </text:span> ⲛⲛ ⲉⲛⲉⲣⲅⲓⲁ̣ [ⲁ]ⲩⲱ̣ [ <text:line-break/><text:span text:style-name="T1"> </text:span><text:span text:style-name="T2">(88/23) </text:span> ⲧⲁⲛ ⲡⲉ ⲛ ⲁ̣[..]ⲁ[ <text:line-break/><text:span text:style-name="T1"> </text:span><text:span text:style-name="T2">(88/24) </text:span> ⲡⲉϥⲉⲓⲛ̣ⲉ̣ [ <text:line-break/><text:span text:style-name="T1"> </text:span><text:span text:style-name="T2">(88/25) </text:span> ⲛⲧⲁϥ ⲉϥ.[ <text:line-break/><text:span text:style-name="T1"> </text:span><text:span text:style-name="T2">(89/1) </text:span> [ <text:line-break/><text:span text:style-name="T1"> </text:span><text:span text:style-name="T2">(89/2) </text:span> [ <text:line-break/><text:span text:style-name="T1"> </text:span><text:span text:style-name="T2">(89/3) </text:span> [ <text:line-break/><text:span text:style-name="T1"> </text:span><text:span text:style-name="T2">(89/4) </text:span> [ ]ⲙ <text:line-break/><text:span text:style-name="T1"> </text:span><text:span text:style-name="T2">(89/5) </text:span> [ ]ϣⲟ <text:line-break/><text:span text:style-name="T1"> </text:span><text:span text:style-name="T2">(89/6) </text:span> [ <text:line-break/><text:span text:style-name="T1"> </text:span><text:span text:style-name="T2">(89/7) </text:span> [ <text:line-break/><text:span text:style-name="T1"> </text:span><text:span text:style-name="T2">(89/8) </text:span> [ ]. <text:line-break/><text:span text:style-name="T1"> </text:span><text:span text:style-name="T2">(89/9) </text:span> [ ϩⲩⲡⲁⲣ]ⲝⲓ[ⲥ <text:line-break/><text:span text:style-name="T1"> </text:span><text:span text:style-name="T2">(89/10) </text:span> [ ] ⲁ̣ⲩⲱ ⲉϥ‐ <text:line-break/><text:span text:style-name="T1"> </text:span><text:span text:style-name="T2">(89/11) </text:span> [ ]ⲩ̣ⲧⲉ <text:line-break/><text:span text:style-name="T1"> </text:span><text:span text:style-name="T2">(89/12) </text:span> [ ]ϣⲱ <text:line-break/><text:span text:style-name="T1"> </text:span><text:span text:style-name="T2">(89/13) </text:span> [ ]ⲡ̣ⲉ ϩⲛ <text:line-break/><text:span text:style-name="T1"> </text:span><text:span text:style-name="T2">(89/14) </text:span> [ ⲡ]ⲓ̣ⲉⲟ‐ <text:line-break/><text:span text:style-name="T1"> </text:span><text:span text:style-name="T2">(89/15) </text:span> [ⲟⲩ ϩ]ⲉⲛⲉⲟⲟⲩ <text:line-break/><text:span text:style-name="T1"> </text:span><text:span text:style-name="T2">(89/16) </text:span> [ ]ⲡ̣ⲟⲥ· ⲟⲩ‐ <text:line-break/><text:span text:style-name="T1"> </text:span><text:span text:style-name="T2">(89/17) </text:span> [ ] ϩⲛ <text:line-break/><text:span text:style-name="T1"> </text:span><text:span text:style-name="T2">(89/18) </text:span> [ ]ⲧ̣ⲏ <text:line-break/><text:span text:style-name="T1"> </text:span><text:span text:style-name="T2">(89/19) </text:span> [ <text:line-break/><text:span text:style-name="T1"> </text:span><text:span text:style-name="T2">(89/20) </text:span> [ ].ⲛ <text:line-break/><text:span text:style-name="T1"> </text:span><text:span text:style-name="T2">(89/21) </text:span> [ ]ⲉⲱⲛ <text:line-break/><text:soft-page-break/><text:span text:style-name="T1"> </text:span><text:span text:style-name="T2">(89/22) </text:span> [ ]ⲟⲓⲁ <text:line-break/><text:span text:style-name="T1"> </text:span><text:span text:style-name="T2">(89/23) </text:span> [ ]ⲏⲟⲩ <text:line-break/><text:span text:style-name="T1"> </text:span><text:span text:style-name="T2">(89/24) </text:span> [ ]ⲟⲩⲧⲉ <text:line-break/><text:span text:style-name="T1"> </text:span><text:span text:style-name="T2">(90/1) </text:span> [ <text:line-break/><text:span text:style-name="T1"> </text:span><text:span text:style-name="T2">(90/2) </text:span> [ <text:line-break/><text:span text:style-name="T1"> </text:span><text:span text:style-name="T2">(90/3) </text:span> [ <text:line-break/><text:span text:style-name="T1"> </text:span><text:span text:style-name="T2">(90/4) </text:span> [ <text:line-break/><text:span text:style-name="T1"> </text:span><text:span text:style-name="T2">(90/5) </text:span> [ <text:line-break/><text:span text:style-name="T1"> </text:span><text:span text:style-name="T2">(90/6) </text:span> [ <text:line-break/><text:span text:style-name="T1"> </text:span><text:span text:style-name="T2">(90/7) </text:span> [ <text:line-break/><text:span text:style-name="T1"> </text:span><text:span text:style-name="T2">(90/8) </text:span> [ <text:line-break/><text:span text:style-name="T1"> </text:span><text:span text:style-name="T2">(90/9) </text:span> ϣⲟⲟ̣[ⲡ <text:line-break/><text:span text:style-name="T1"> </text:span><text:span text:style-name="T2">(90/10) </text:span> ⲡⲉ̣ ⲛ ⲁ̣[ <text:line-break/><text:span text:style-name="T1"> </text:span><text:span text:style-name="T2">(90/11) </text:span> ⲛ [ <text:line-break/><text:span text:style-name="T1"> </text:span><text:span text:style-name="T2">(90/12) </text:span> ⲙ[ⲛ <text:line-break/><text:span text:style-name="T1"> </text:span><text:span text:style-name="T2">(90/13) </text:span> ⲕⲁ[ <text:line-break/><text:span text:style-name="T1"> </text:span><text:span text:style-name="T2">(90/14) </text:span> ⲛⲉ̣[ <text:line-break/><text:span text:style-name="T1"> </text:span><text:span text:style-name="T2">(90/15) </text:span> ⲙⲛⲧ’.[ <text:line-break/><text:span text:style-name="T1"> </text:span><text:span text:style-name="T2">(90/16) </text:span> ⲙⲁⲕ[ⲁⲣⲓⲟⲥ <text:line-break/><text:span text:style-name="T1"> </text:span><text:span text:style-name="T2">(90/17) </text:span> ⲛ ⲛ[ <text:line-break/><text:span text:style-name="T1"> </text:span><text:span text:style-name="T2">(90/18) </text:span> ⲗⲓ[ⲟⲥ <text:line-break/><text:span text:style-name="T1"> </text:span><text:span text:style-name="T2">(90/19) </text:span> ⲣ[ <text:line-break/><text:span text:style-name="T1"> </text:span><text:span text:style-name="T2">(90/20) </text:span> ⲧ[ <text:line-break/><text:span text:style-name="T1"> </text:span><text:span text:style-name="T2">(90/21) </text:span> ⲉⲛⲁ[ <text:line-break/><text:span text:style-name="T1"> </text:span><text:span text:style-name="T2">(90/22) </text:span> ⲛⲧⲉ[ <text:line-break/><text:span text:style-name="T1"> </text:span><text:span text:style-name="T2">(90/23) </text:span> ⲉⲟ̣[ <text:line-break/><text:span text:style-name="T1"> </text:span><text:span text:style-name="T2">(90/24) </text:span> ⲱⲛϩ [ <text:line-break/><text:span text:style-name="T1"> </text:span><text:span text:style-name="T2">(90/25) </text:span> ⲉϣ.[ <text:line-break/><text:span text:style-name="T1"> </text:span><text:span text:style-name="T2">(91/1) </text:span> [ <text:line-break/><text:span text:style-name="T1"> </text:span><text:span text:style-name="T2">(91/2) </text:span> [ <text:line-break/><text:span text:style-name="T1"> </text:span><text:span text:style-name="T2">(91/3) </text:span> [ <text:line-break/><text:span text:style-name="T1"> </text:span><text:span text:style-name="T2">(91/4) </text:span> [ <text:line-break/><text:span text:style-name="T1"> </text:span><text:span text:style-name="T2">(91/5) </text:span> [ <text:line-break/><text:span text:style-name="T1"> </text:span><text:span text:style-name="T2">(91/6) </text:span> [ <text:line-break/><text:span text:style-name="T1"> </text:span><text:span text:style-name="T2">(91/7) </text:span> [ <text:line-break/><text:span text:style-name="T1"> </text:span><text:span text:style-name="T2">(91/8) </text:span> [ ]ⲉ <text:line-break/><text:span text:style-name="T1"> </text:span><text:span text:style-name="T2">(91/9) </text:span> [ ]ⲛ ⲛⲟⲩⲧⲉ <text:line-break/><text:span text:style-name="T1"> </text:span><text:span text:style-name="T2">(91/10) </text:span> [ ].ⲧⲉ ⲉⲃⲟⲗ· <text:line-break/><text:span text:style-name="T1"> </text:span><text:span text:style-name="T2">(91/11) </text:span> [......]..[......].[.]ⲱϥ <text:line-break/><text:span text:style-name="T1"> </text:span><text:span text:style-name="T2">(91/12) </text:span> [.....]ⲙⲡⲓⲙ[.....]ⲧ̣ⲉ <text:line-break/><text:span text:style-name="T1"> </text:span><text:span text:style-name="T2">(91/13) </text:span> [.....]ⲩ̣ⲉⲉⲧ[...]ϣⲟⲣⲡ’ <text:line-break/><text:span text:style-name="T1"> </text:span><text:span text:style-name="T2">(91/14) </text:span> [...]ⲙⲉⲉⲣ[..] ⲙⲛ ϩⲉⲛϭⲟⲙ <text:line-break/><text:span text:style-name="T1"> </text:span><text:span text:style-name="T2">(91/15) </text:span> [..]ⲣⲉϥ[....]ⲡ’ ⲉⲣⲟϥ ⲙ ⲡⲁⲛ‐ <text:line-break/><text:span text:style-name="T1"> </text:span><text:span text:style-name="T2">(91/16) </text:span> [ⲧⲉⲗⲓ]ⲟⲥ [....]ⲥⲙ ⲛⲉ ⲛⲧⲉ <text:line-break/><text:span text:style-name="T1"> </text:span><text:span text:style-name="T2">(91/17) </text:span> [ⲛ]ⲁ̣ⲓ̈ ⲧⲏⲣ[ⲟⲩ] ⲁⲩⲱ ⲟⲩⲗⲟⲓ̈‐ <text:line-break/><text:span text:style-name="T1"> </text:span><text:span text:style-name="T2">(91/18) </text:span> [ϭ]ⲉ ⲛⲧⲁ[ ⲧ]ⲏⲣⲟⲩ ⲉⲩⲙⲛⲧ’‐ <text:line-break/><text:span text:style-name="T1"> </text:span><text:span text:style-name="T2">(91/19) </text:span> [.].[..]ⲟⲥ[...].[..]ⲃ̣̅̅ⲁ̅ⲣ̅ⲃ̅ⲏ̅ⲗ̅ⲱ̅ <text:line-break/><text:soft-page-break/><text:span text:style-name="T1"> </text:span><text:span text:style-name="T2">(91/20) </text:span> [...]ϥⲱⲡ[...]. ⲉ̣[ⲣ]ⲟϥ ⲁⲩⲱ <text:line-break/><text:span text:style-name="T1"> </text:span><text:span text:style-name="T2">(91/21) </text:span> [....].ⲁϥ̣[.] ⲛⲁⲓ̈ ⲧⲏⲣ̣ⲟⲩ ⲛ <text:line-break/><text:span text:style-name="T1"> </text:span><text:span text:style-name="T2">(91/22) </text:span> [.....]ⲏⲧ̣[.]ⲉⲙⲡϥⲕ̣ⲁⲗⲁ <text:line-break/><text:span text:style-name="T1"> </text:span><text:span text:style-name="T2">(91/23) </text:span> [.........] ⲙ̣ⲛ ⲧⲉϥⲙⲛⲧ’‐ <text:line-break/><text:span text:style-name="T1"> </text:span><text:span text:style-name="T2">(91/24) </text:span> [ ]ϣⲱⲡⲉ <text:line-break/><text:span text:style-name="T1"> </text:span><text:span text:style-name="T2">(91/25) </text:span> [.........]ⲡ̣· ⲁⲗⲗⲁ <text:line-break/><text:span text:style-name="T1"> </text:span><text:span text:style-name="T2">(92/1) </text:span> [ <text:line-break/><text:span text:style-name="T1"> </text:span><text:span text:style-name="T2">(92/2) </text:span> [ <text:line-break/><text:span text:style-name="T1"> </text:span><text:span text:style-name="T2">(92/3) </text:span> [ <text:line-break/><text:span text:style-name="T1"> </text:span><text:span text:style-name="T2">(92/4) </text:span> [ <text:line-break/><text:span text:style-name="T1"> </text:span><text:span text:style-name="T2">(92/5) </text:span> [ <text:line-break/><text:span text:style-name="T1"> </text:span><text:span text:style-name="T2">(92/6) </text:span> [ <text:line-break/><text:span text:style-name="T1"> </text:span><text:span text:style-name="T2">(92/7) </text:span> [ <text:line-break/><text:span text:style-name="T1"> </text:span><text:span text:style-name="T2">(92/8) </text:span> .[ <text:line-break/><text:span text:style-name="T1"> </text:span><text:span text:style-name="T2">(92/9) </text:span> [ <text:line-break/><text:span text:style-name="T1"> </text:span><text:span text:style-name="T2">(92/10) </text:span> ⲛⲧⲉ ⲛ[ <text:line-break/><text:span text:style-name="T1"> </text:span><text:span text:style-name="T2">(92/11) </text:span> ⲉⲃⲟ[ⲗ]..[ <text:line-break/><text:span text:style-name="T1"> </text:span><text:span text:style-name="T2">(92/12) </text:span> ⲁⲩ[ⲱ ...]ϣⲱ.[ <text:line-break/><text:span text:style-name="T1"> </text:span><text:span text:style-name="T2">(92/13) </text:span> ⲛⲧⲁⲥ[...]ⲩ ⲛ ⲥ.[ <text:line-break/><text:span text:style-name="T1"> </text:span><text:span text:style-name="T2">(92/14) </text:span> ⲟⲩⲱⲧ’· [....]ⲏⲉⲧ[ <text:line-break/><text:span text:style-name="T1"> </text:span><text:span text:style-name="T2">(92/15) </text:span> ⲙⲛ ⲟⲩⲙ[.....].ⲙ[ <text:line-break/><text:span text:style-name="T1"> </text:span><text:span text:style-name="T2">(92/16) </text:span> ⲛϩⲣⲁⲓ̈ ϩⲛ ⲟ[ⲩ...]ϩⲁ[ <text:line-break/><text:span text:style-name="T1"> </text:span><text:span text:style-name="T2">(92/17) </text:span> ⲕⲁⲧⲁ ⲡⲓⲛⲟⲏ[ⲙⲁ] ⲉⲧ’ϣ[ⲟⲟⲡ’] <text:line-break/><text:span text:style-name="T1"> </text:span><text:span text:style-name="T2">(92/18) </text:span> ⲟⲛⲧⲱ̣[ⲥ..] ⲉⲧ̣[ϣⲟ]ⲟⲡ’ ⲛ [ <text:line-break/><text:span text:style-name="T1"> </text:span><text:span text:style-name="T2">(92/19) </text:span> ϯⲣⲁⲛ ⲉ̣[......] ⲛ [..]ⲁⲧ̣[ <text:line-break/><text:span text:style-name="T1"> </text:span><text:span text:style-name="T2">(92/20) </text:span> ⲥⲟⲩ[......]ⲡⲓⲛ[ <text:line-break/><text:span text:style-name="T1"> </text:span><text:span text:style-name="T2">(92/21) </text:span> ⲕⲗ̅ⲥ̅ ⲛ [......]ⲟ[ <text:line-break/><text:span text:style-name="T1"> </text:span><text:span text:style-name="T2">(92/22) </text:span> ⲡⲛ̅ⲟ̣̅[......]ⲛⲧ[ <text:line-break/><text:span text:style-name="T1"> </text:span><text:span text:style-name="T2">(92/23) </text:span> ϣⲙⲧ[.]ⲥ̣[ <text:line-break/><text:span text:style-name="T1"> </text:span><text:span text:style-name="T2">(92/24) </text:span> ⲛⲉ ⲛ [ <text:line-break/><text:span text:style-name="T1"> </text:span><text:span text:style-name="T2">(92/25) </text:span> ⲁⲗⲗⲁ [ <text:line-break/><text:span text:style-name="T1"> </text:span><text:span text:style-name="T2">(93/1) </text:span> ϯ ⲣⲁⲛ ⲉⲣⲟϥ ⲛⲁⲓ̈ ⲧⲏⲣⲟⲩ ϣⲁⲩ‐ <text:line-break/><text:span text:style-name="T1"> </text:span><text:span text:style-name="T2">(93/2) </text:span> ⲣ ⲡⲣⲏⲧⲉ ⲉⲩⲛⲛⲏⲩ ⲉⲃⲟ̣ⲗ̣ <text:line-break/><text:span text:style-name="T1"> </text:span><text:span text:style-name="T2">(93/3) </text:span> ϩⲙ ⲡⲏ ⲉⲧ’ⲑⲉⲃ[ⲓⲏ]ⲟ̣ⲩ̣ⲧ’· ⲉ̣‐ <text:line-break/><text:span text:style-name="T1"> </text:span><text:span text:style-name="T2">(93/4) </text:span> ϣ[ⲱ]ⲡ̣ⲉ ⲇⲉ ⲉⲕϣⲁⲛϯ ⲉⲟ̣ⲟ̣ⲩ <text:line-break/><text:span text:style-name="T1"> </text:span><text:span text:style-name="T2">(93/5) </text:span> ⲉⲧ[ⲃⲏ]ⲏ̣ⲧϥ· ⲉϣⲱ̣[ⲡⲉ] ⲇⲉ ⲉⲕ‐ <text:line-break/><text:span text:style-name="T1"> </text:span><text:span text:style-name="T2">(93/6) </text:span> ϣⲁ[ⲛ].ⲉⲉⲩⲧ̣[..ϩ]ⲩⲡⲁⲣ‐ <text:line-break/><text:span text:style-name="T1"> </text:span><text:span text:style-name="T2">(93/7) </text:span> ⲝ[ⲓⲥ...]ⲡϣ.[.....]ⲡⲉϥ‐ <text:line-break/><text:span text:style-name="T1"> </text:span><text:span text:style-name="T2">(93/8) </text:span> ϩ.[.....]ⲥ[.....]ⲛⲁ ⲛ ⲟⲩ‐ <text:line-break/><text:span text:style-name="T1"> </text:span><text:span text:style-name="T2">(93/9) </text:span> ⲟ̣[ ]ⲛ̣ ϩⲁⲡⲗⲟⲩⲛ <text:line-break/><text:span text:style-name="T1"> </text:span><text:span text:style-name="T2">(93/10) </text:span> .[ ]ⲛ <text:line-break/><text:span text:style-name="T1"> </text:span><text:span text:style-name="T2">(93/11) </text:span> [ ]ϥ· <text:line-break/><text:span text:style-name="T1"> </text:span><text:span text:style-name="T2">(93/12) </text:span> [ ]ⲉϥⲛⲁ <text:line-break/><text:span text:style-name="T1"> </text:span><text:span text:style-name="T2">(93/13) </text:span> [ ].ϥ· <text:line-break/><text:span text:style-name="T1"> </text:span><text:span text:style-name="T2">(93/14) </text:span> [ ].ⲡⲏ ⲉ <text:line-break/><text:span text:style-name="T1"> </text:span><text:span text:style-name="T2">(93/15) </text:span> [ ⲥⲟⲩ]ⲱⲛϥ <text:line-break/><text:span text:style-name="T1"> </text:span><text:span text:style-name="T2">(93/16) </text:span> [ ]ⲩ̣ⲧⲛ· ⲛ <text:line-break/><text:soft-page-break/><text:span text:style-name="T1"> </text:span><text:span text:style-name="T2">(93/17) </text:span> ϩⲣⲁ[ ] ⲛ ⲧⲉⲗⲓⲟⲥ <text:line-break/><text:span text:style-name="T1"> </text:span><text:span text:style-name="T2">(93/18) </text:span> ⲉϥⲉ̣[ ⲧⲉⲗ]ⲓⲟⲥ <text:line-break/><text:span text:style-name="T1"> </text:span><text:span text:style-name="T2">(93/19) </text:span> ⲁⲩⲱ̣[ ]ⲁⲉ <text:line-break/><text:span text:style-name="T1"> </text:span><text:span text:style-name="T2">(93/20) </text:span> ⲧⲛ̣ [ ]ϫⲱⲕ <text:line-break/><text:span text:style-name="T1"> </text:span><text:span text:style-name="T2">(93/21) </text:span> ⲉ̣[ ]ⲛⲙⲉ <text:line-break/><text:span text:style-name="T1"> </text:span><text:span text:style-name="T2">(93/22) </text:span> [ ]ⲡⲉϥ‐ <text:line-break/><text:span text:style-name="T1"> </text:span><text:span text:style-name="T2">(93/23) </text:span> [ ]ⲧⲁⲩ <text:line-break/><text:span text:style-name="T1"> </text:span><text:span text:style-name="T2">(93/24) </text:span> [ ]ⲁϥ· <text:line-break/><text:span text:style-name="T1"> </text:span><text:span text:style-name="T2">(93/25) </text:span> [ ].ⲁ̣ⲩ̣ ⲉ ϯ ⲙⲛ <text:line-break/><text:span text:style-name="T1"> </text:span><text:span text:style-name="T2">(93/26) </text:span> [ ]ⲛⲉⲧⲙ[. <text:line-break/><text:span text:style-name="T1"> </text:span><text:span text:style-name="T2">(94/1) </text:span> [ⲉ]ⲙⲡ̣ϥ̣ϭⲙ ϭⲟ̣ⲙ̣ ⲉ ⲛⲁⲩ ⲉⲣⲟⲥ <text:line-break/><text:span text:style-name="T1"> </text:span><text:span text:style-name="T2">(94/2) </text:span> ⲉⲧⲃⲉ ⲡⲁⲓ̈ ⲙⲙⲛ ϣϭⲟⲙ ⲉ ϫⲓ‐ <text:line-break/><text:span text:style-name="T1"> </text:span><text:span text:style-name="T2">(94/3) </text:span> ⲧϥ ⲙ ⲡⲉⲓ̈ⲣⲏⲧⲉ ⲛϩⲣⲁⲓ̈ ϩⲛ <text:line-break/><text:span text:style-name="T1"> </text:span><text:span text:style-name="T2">(94/4) </text:span> ⲟⲩⲧⲃⲃ[ⲟ] ⲛⲧⲉ ϯⲙ̣ⲛ̣ⲧⲛⲟϭ <text:line-break/><text:span text:style-name="T1"> </text:span><text:span text:style-name="T2">(94/5) </text:span> ⲉⲟⲩⲁⲡⲉ ⲛ ⲧⲉⲗ̣[ⲓⲟ]ⲥ ⲛⲧⲉ <text:line-break/><text:span text:style-name="T1"> </text:span><text:span text:style-name="T2">(94/6) </text:span> ⲡ[ⲏ ⲉ]ⲧ’ϩⲛ ⲟⲩⲉⲓ̣[...] ⲥⲛⲧⲉ <text:line-break/><text:span text:style-name="T1"> </text:span><text:span text:style-name="T2">(94/7) </text:span> ⲡ[......].ⲉⲉ[...].ⲥ̣ ⲉⲧⲉ <text:line-break/><text:span text:style-name="T1"> </text:span><text:span text:style-name="T2">(94/8) </text:span> ⲛ ⲟ̣[.......]ⲁⲛ̣[..ⲥⲟⲩ]ⲱⲛϥ <text:line-break/><text:span text:style-name="T1"> </text:span><text:span text:style-name="T2">(94/9) </text:span> ⲉⲧⲃⲉ̣[....]ⲥ̣[........]ϣⲁϫⲉ <text:line-break/><text:span text:style-name="T1"> </text:span><text:span text:style-name="T2">(94/10) </text:span> ⲙ[ⲙ]ⲟ̣ϥ̣ [ ].ⲉ <text:line-break/><text:span text:style-name="T1"> </text:span><text:span text:style-name="T2">(94/11) </text:span> ⲧⲉ̣[ <text:line-break/><text:span text:style-name="T1"> </text:span><text:span text:style-name="T2">(94/12) </text:span> ⲱⲛ[ <text:line-break/><text:span text:style-name="T1"> </text:span><text:span text:style-name="T2">(94/13) </text:span> ⲉⲧ.[ <text:line-break/><text:span text:style-name="T1"> </text:span><text:span text:style-name="T2">(94/14) </text:span> ϩⲓⲟ[ <text:line-break/><text:span text:style-name="T1"> </text:span><text:span text:style-name="T2">(94/15) </text:span> ⲙ ⲡⲉ[ ].ⲥ[ <text:line-break/><text:span text:style-name="T1"> </text:span><text:span text:style-name="T2">(94/16) </text:span> ⲉⲧ’ⲕⲱ̣[ ]ⲅⲁⲣ̣[ <text:line-break/><text:span text:style-name="T1"> </text:span><text:span text:style-name="T2">(94/17) </text:span> ⲛⲁⲛ ⲛ[ ]ⲩ ⲉⲣⲟϥ[ <text:line-break/><text:span text:style-name="T1"> </text:span><text:span text:style-name="T2">(94/18) </text:span> ⲧ[ ϣⲟⲟ]ⲡ’ ϩⲓ ⲟⲩⲙⲁ[ <text:line-break/><text:span text:style-name="T1"> </text:span><text:span text:style-name="T2">(94/19) </text:span> ⲧ[ ] ⲇⲉ ⲙⲙⲟ[ <text:line-break/><text:span text:style-name="T1"> </text:span><text:span text:style-name="T2">(94/20) </text:span> ⲕⲁ.[ ]ⲛ ϩⲓ..[ <text:line-break/><text:span text:style-name="T1"> </text:span><text:span text:style-name="T2">(94/21) </text:span> ⲕⲁ[ <text:line-break/><text:span text:style-name="T1"> </text:span><text:span text:style-name="T2">(94/22) </text:span> ⲕⲁ[ <text:line-break/><text:span text:style-name="T1"> </text:span><text:span text:style-name="T2">(94/23) </text:span> ⲛ̅ ⲧ[ <text:line-break/><text:span text:style-name="T1"> </text:span><text:span text:style-name="T2">(94/24) </text:span> ⲧⲁϥ[ <text:line-break/><text:span text:style-name="T1"> </text:span><text:span text:style-name="T2">(94/25) </text:span> .. ⲟⲩⲧⲉ̣[ <text:line-break/><text:span text:style-name="T1"> </text:span><text:span text:style-name="T2">(95/1) </text:span> ⲫⲟⲣⲁ ⲛⲧⲉ ⲛⲁⲓ̈ ⲙⲛ ϩⲉⲛⲁ̣ⲅ‐ <text:line-break/><text:span text:style-name="T1"> </text:span><text:span text:style-name="T2">(95/2) </text:span> ⲅⲉⲗⲟⲥ· ⲁⲩⲱ ϩⲉⲛⲇⲓⲁⲫⲟ‐ <text:line-break/><text:span text:style-name="T1"> </text:span><text:span text:style-name="T2">(95/3) </text:span> ⲣⲁ ⲛⲧⲉ ⲛⲁⲓ̈ ⲙⲛ ϩⲉⲛⲣⲱⲙⲉ <text:line-break/><text:span text:style-name="T1"> </text:span><text:span text:style-name="T2">(95/4) </text:span> ⲁⲩⲱ̣ [ϩⲉ]ⲛ̣ⲇⲓⲁⲫⲟⲣⲁ ⲛⲧⲉ <text:line-break/><text:span text:style-name="T1"> </text:span><text:span text:style-name="T2">(95/5) </text:span> ⲛⲁⲓ̈ [ⲙⲛ] ⲟⲩϩⲩⲡ[ⲁⲣ]ⲝ̣ⲓⲥ· <text:line-break/><text:span text:style-name="T1"> </text:span><text:span text:style-name="T2">(95/6) </text:span> ⲁⲩⲱ̣ [ϩⲉ]ⲛⲟ.[......]ⲟⲩ <text:line-break/><text:span text:style-name="T1"> </text:span><text:span text:style-name="T2">(95/7) </text:span> ⲥⲓ[......]ⲟ.[......]ⲛⲟⲩ <text:line-break/><text:span text:style-name="T1"> </text:span><text:span text:style-name="T2">(95/8) </text:span> ⲏ̣[.....] ⲙⲛ [ⲟⲩⲉⲥ]ⲑ̣ⲏⲥⲓⲥ <text:line-break/><text:span text:style-name="T1"> </text:span><text:span text:style-name="T2">(95/9) </text:span> [ ]ⲧⲱⲥ <text:line-break/><text:span text:style-name="T1"> </text:span><text:span text:style-name="T2">(95/10) </text:span> [ ]ⲛⲛⲏ <text:line-break/><text:span text:style-name="T1"> </text:span><text:span text:style-name="T2">(95/11) </text:span> [ ]ⲟ̣ⲛⲧⲱⲥ <text:line-break/><text:span text:style-name="T1"> </text:span><text:span text:style-name="T2">(95/12) </text:span> [ ]ⲟⲩ· <text:line-break/><text:soft-page-break/><text:span text:style-name="T1"> </text:span><text:span text:style-name="T2">(95/13) </text:span> ⲕ̣ⲁⲓⲅ̣[ⲁⲣ .....] ⲡⲓⲕⲟⲥⲙⲟⲥ <text:line-break/><text:span text:style-name="T1"> </text:span><text:span text:style-name="T2">(95/14) </text:span> ⲛ ⲉⲥ[ⲑⲏⲧⲟⲛ .. ⲙ] ⲡ̣[ⲣ]ⲏⲧⲉ <text:line-break/><text:span text:style-name="T1"> </text:span><text:span text:style-name="T2">(95/15) </text:span> ⲉ[ ]ⲛⲟⲩ <text:line-break/><text:span text:style-name="T1"> </text:span><text:span text:style-name="T2">(95/16) </text:span> ϩⲩⲡ[ⲁⲣⲝⲓⲥ ]ⲩ <text:line-break/><text:span text:style-name="T1"> </text:span><text:span text:style-name="T2">(95/17) </text:span> ⲅⲁⲣ ⲉⲩ[ <text:line-break/><text:span text:style-name="T1"> </text:span><text:span text:style-name="T2">(95/18) </text:span> ⲁⲩⲱ̣[ ].ⲁ̣ <text:line-break/><text:span text:style-name="T1"> </text:span><text:span text:style-name="T2">(95/19) </text:span> ⲛ .[ ]ⲉ <text:line-break/><text:span text:style-name="T1"> </text:span><text:span text:style-name="T2">(95/20) </text:span> (Lines 20 and following do not survive.) <text:line-break/><text:span text:style-name="T1"> </text:span><text:span text:style-name="T2">(96/1) </text:span> [ⲛ]ⲁ̣ϩⲱⲛ ⲉⲣⲟϥ ϩⲛ ⲟⲩⲥⲟⲟⲩⲛ <text:line-break/><text:span text:style-name="T1"> </text:span><text:span text:style-name="T2">(96/2) </text:span> ϣⲁϥϫⲓ ϭⲟⲙ· ⲁⲩⲱ ⲡⲏ ⲉⲧⲛⲉ‐ <text:line-break/><text:span text:style-name="T1"> </text:span><text:span text:style-name="T2">(96/3) </text:span> ⲟⲩⲉ ⲙⲙⲟϥ· ϣⲁϥⲑⲃⲃⲓⲟ· <text:line-break/><text:span text:style-name="T1"> </text:span><text:span text:style-name="T2">(96/4) </text:span> ⲁⲛⲟⲕ ⲇⲉ ⲡⲉϫⲁⲉⲓ̣ [ϫⲉ] ⲉⲧⲃⲉ ⲟ[ⲩ] <text:line-break/><text:span text:style-name="T1"> </text:span><text:span text:style-name="T2">(96/5) </text:span> ⲟⲩ̣ⲛ̣ ⲁⲩϣⲱⲡ[ⲉ ⲛϭⲓ] ⲛⲓⲣⲉϥϯ <text:line-break/><text:span text:style-name="T1"> </text:span><text:span text:style-name="T2">(96/6) </text:span> ϩⲁⲡ [ⲏ%0] ⲟⲩ ⲡⲉ ⲡⲓϫ[ⲓ ⲙ]ⲕⲁϩ ⲛⲧⲉ <text:line-break/><text:span text:style-name="T1"> </text:span><text:span text:style-name="T2">(96/7) </text:span> ⲡⲓ̣[.....] ⲛ ⲛⲉ[....].ⲉ ⲅⲁⲣ <text:line-break/><text:span text:style-name="T1"> </text:span><text:span text:style-name="T2">(96/8) </text:span> ⲛⲁ[.]ⲁ̣ [....]ϯ ⲙ[......].ⲙⲉ <text:line-break/><text:span text:style-name="T1"> </text:span><text:span text:style-name="T2">(96/9) </text:span> ⲁⲩⲱ [.....].ⲟ[.....]. ⲡⲉ <text:line-break/><text:span text:style-name="T1"> </text:span><text:span text:style-name="T2">(96/10) </text:span> ϫ[ <text:line-break/><text:span text:style-name="T1"> </text:span><text:span text:style-name="T2">(96/11) </text:span> ϣⲱ̣[ <text:line-break/><text:span text:style-name="T1"> </text:span><text:span text:style-name="T2">(96/12) </text:span> ⲁⲗⲗ[ⲁ <text:line-break/><text:span text:style-name="T1"> </text:span><text:span text:style-name="T2">(96/13) </text:span> ⲛⲥⲉ[ ]ⲧ’.[.. <text:line-break/><text:span text:style-name="T1"> </text:span><text:span text:style-name="T2">(96/14) </text:span> ⲉⲃⲟ̣ⲗ ϩⲓ[ⲧⲛ ] ⲉⲧ’ϩⲉ̣[ <text:line-break/><text:span text:style-name="T1"> </text:span><text:span text:style-name="T2">(96/15) </text:span> ⲡⲓϫⲓ̣ ⲙⲕ̣[ⲁϩ.......] ϩⲓⲧⲙ [ <text:line-break/><text:span text:style-name="T1"> </text:span><text:span text:style-name="T2">(96/16) </text:span> ⲡⲥⲟ̣[ ]ϥ̣ϯⲟ[ <text:line-break/><text:span text:style-name="T1"> </text:span><text:span text:style-name="T2">(96/17) </text:span> ⲛ .[ ]ϣⲟⲟⲡ’̣ <text:line-break/><text:span text:style-name="T1"> </text:span><text:span text:style-name="T2">(96/18) </text:span> ⲛ ⲥ̣[ ].ⲉⲥⲟⲩ‐ <text:line-break/><text:span text:style-name="T1"> </text:span><text:span text:style-name="T2">(96/19) </text:span> §ⲏϩ [ ]ⲱⲣϫ· <text:line-break/><text:span text:style-name="T1"> </text:span><text:span text:style-name="T2">(96/20) </text:span> §[ ]ⲡ’ [ <text:line-break/><text:span text:style-name="T1"> </text:span><text:span text:style-name="T2">(96/21) </text:span> [ ].ⲡ[ <text:line-break/><text:span text:style-name="T1"> </text:span><text:span text:style-name="T2">(96/22) </text:span> (Lines 22 and following do not survive.) <text:line-break/><text:span text:style-name="T1"> </text:span><text:span text:style-name="T2">(97/1) </text:span> [ϩ]ⲟⲟⲩⲧ’ ⲉⲩⲅⲛⲱ[ⲥⲓ]ⲥ ⲧ[ⲉ ⲛⲧ]ⲉ <text:line-break/><text:span text:style-name="T1"> </text:span><text:span text:style-name="T2">(97/2) </text:span> ⲡ̣ⲓϣⲙⲧ’ϭⲟⲙ ⲛⲛ ⲁⲧⲛⲁⲩ ⲉⲣⲟϥ <text:line-break/><text:span text:style-name="T1"> </text:span><text:span text:style-name="T2">(97/3) </text:span> [ⲛ] ⲛⲟϭ ⲙ ⲡ̅ⲛ̅ⲁ̅· ϯϩⲓⲕⲱⲛ ⲛ̣ⲧⲉ <text:line-break/><text:span text:style-name="T1"> </text:span><text:span text:style-name="T2">(97/4) </text:span> [ⲡⲓϣⲟⲣ]ⲡ’ ⲛ̣ ⲕ̅ⲗ̅ⲥ̅· ϯⲙⲛⲧ’ⲙⲁ‐ <text:line-break/><text:span text:style-name="T1"> </text:span><text:span text:style-name="T2">(97/5) </text:span> [ⲕⲁⲣⲓⲟⲥ ⲉⲧ]ϣⲟⲟⲡ’ ϩⲙ ⲡⲓⲁϩⲟ‐ <text:line-break/><text:span text:style-name="T1"> </text:span><text:span text:style-name="T2">(97/6) </text:span> [ⲣⲁⲧⲟⲛ ⲙ] ⲡ̅ⲛ̅ⲁ̅· ⲭⲱ̣[...] ϯⲁⲧ’ <text:line-break/><text:span text:style-name="T1"> </text:span><text:span text:style-name="T2">(97/7) </text:span> [.........].[......]ⲁ̣ⲧ’ <text:line-break/><text:span text:style-name="T1"> </text:span><text:span text:style-name="T2">(97/8) </text:span> [.........]ⲩⲱ̣[......] ⲅⲁⲣ <text:line-break/><text:span text:style-name="T1"> </text:span><text:span text:style-name="T2">(97/9) </text:span> [.......]ϩ.[......] ⲉϥⲉⲓⲙⲉ <text:line-break/><text:span text:style-name="T1"> </text:span><text:span text:style-name="T2">(97/10) </text:span> [ ]· <text:line-break/><text:span text:style-name="T1"> </text:span><text:span text:style-name="T2">(97/11) </text:span> [ ]ⲩ̣ⲉⲓⲧ’ <text:line-break/><text:span text:style-name="T1"> </text:span><text:span text:style-name="T2">(97/12) </text:span> [ ]ⲛ ⲁⲧ’ <text:line-break/><text:span text:style-name="T1"> </text:span><text:span text:style-name="T2">(97/13) </text:span> [ ]ⲙⲟⲩϩ <text:line-break/><text:span text:style-name="T1"> </text:span><text:span text:style-name="T2">(97/14) </text:span> [..]ⲛⲟ̣[ ] ⲉⲥⲟⲩ‐ <text:line-break/><text:span text:style-name="T1"> </text:span><text:span text:style-name="T2">(97/15) </text:span> ⲱ̣ⲛϩ ⲉ̣[ⲃⲟⲗ ]ⲅⲛⲱ‐ <text:line-break/><text:span text:style-name="T1"> </text:span><text:span text:style-name="T2">(97/16) </text:span> ⲥⲓⲥ ⲙ [ ]ⲥⲁϩⲉ‐ <text:line-break/><text:span text:style-name="T1"> </text:span><text:span text:style-name="T2">(97/17) </text:span> ⲣⲁ[ⲧ]ⲥ[ ].ⲥ <text:line-break/><text:soft-page-break/><text:span text:style-name="T1"> </text:span><text:span text:style-name="T2">(97/18) </text:span> ⲛ ⲛ[ ϩ]ⲙ <text:line-break/><text:span text:style-name="T1"> </text:span><text:span text:style-name="T2">(97/19) </text:span> [ ]· <text:line-break/><text:span text:style-name="T1"> </text:span><text:span text:style-name="T2">(97/20) </text:span> [ ]. ⲙ <text:line-break/><text:span text:style-name="T1"> </text:span><text:span text:style-name="T2">(97/21) </text:span> (Lines 21 and following do not survive.) <text:line-break/><text:span text:style-name="T1"> </text:span><text:span text:style-name="T2">(98/1) </text:span> [..] ⲟⲩ[ϩⲉ]ⲛⲛⲁⲥ ⲛ ⲧⲉⲗⲓⲟⲥ ⲛ̣‐ <text:line-break/><text:span text:style-name="T1"> </text:span><text:span text:style-name="T2">(98/2) </text:span> ⲧ̣ⲉ ⲟⲩ ϩ̣ⲉ̣ⲛⲛⲁⲥ ⲉⲥϫⲏⲕ· ⲁ[ⲩⲱ] <text:line-break/><text:span text:style-name="T1"> </text:span><text:span text:style-name="T2">(98/3) </text:span> [ⲉ]ⲧⲁⲥⲡⲱϣ ⲉ ⲡⲧⲏⲣϥ ⲉ̣ⲃ[ⲟⲗ] <text:line-break/><text:span text:style-name="T1"> </text:span><text:span text:style-name="T2">(98/4) </text:span> ϩⲓⲧ̣ⲛ [ⲡ]ⲧⲏ̣ⲣϥ· ⲉ̣[ <text:line-break/><text:span text:style-name="T1"> </text:span><text:span text:style-name="T2">(98/5) </text:span> ϩⲩⲡⲁⲣ̣ⲝⲓⲥ ⲙⲛ̣ [ <text:line-break/><text:span text:style-name="T1"> </text:span><text:span text:style-name="T2">(98/6) </text:span> ⲧⲉ [...] ⲛⲓⲙⲉⲉⲩ̣ⲉ̣ [ <text:line-break/><text:span text:style-name="T1"> </text:span><text:span text:style-name="T2">(98/7) </text:span> ⲡ[.......]..[ <text:line-break/><text:span text:style-name="T1"> </text:span><text:span text:style-name="T2">(98/8) </text:span> ⲟ[.......].ⲥ̣[ <text:line-break/><text:span text:style-name="T1"> </text:span><text:span text:style-name="T2">(98/9) </text:span> ⲉⲥⲑ̣[ⲏⲥⲓⲥ .]ⲡⲓⲛ[ <text:line-break/><text:span text:style-name="T1"> </text:span><text:span text:style-name="T2">(98/10) </text:span> ⲣ[ <text:line-break/><text:span text:style-name="T1"> </text:span><text:span text:style-name="T2">(98/11) </text:span> ⲙ [ <text:line-break/><text:span text:style-name="T1"> </text:span><text:span text:style-name="T2">(98/12) </text:span> ϩⲓ[ <text:line-break/><text:span text:style-name="T1"> </text:span><text:span text:style-name="T2">(98/13) </text:span> ⲛ .[ <text:line-break/><text:span text:style-name="T1"> </text:span><text:span text:style-name="T2">(98/14) </text:span> ⲟⲥ̣[ ]ⲣⲟ <text:line-break/><text:span text:style-name="T1"> </text:span><text:span text:style-name="T2">(98/15) </text:span> ⲉⲓ̣[ ]ⲧⲙⲙ[ <text:line-break/><text:span text:style-name="T1"> </text:span><text:span text:style-name="T2">(98/16) </text:span> ⲁ[ ].ⲓ.ⲉ <text:line-break/><text:span text:style-name="T1"> </text:span><text:span text:style-name="T2">(98/17) </text:span> ⲉⲗ[ ]ⲉ ⲛ <text:line-break/><text:span text:style-name="T1"> </text:span><text:span text:style-name="T2">(98/18) </text:span> ϩ[ ]. <text:line-break/><text:span text:style-name="T1"> </text:span><text:span text:style-name="T2">(98/19) </text:span> ⲡ[ <text:line-break/><text:span text:style-name="T1"> </text:span><text:span text:style-name="T2">(98/20) </text:span> .[ <text:line-break/><text:span text:style-name="T1"> </text:span><text:span text:style-name="T2">(98/21) </text:span> .[ <text:line-break/><text:span text:style-name="T1"> </text:span><text:span text:style-name="T2">(98/22) </text:span> (Lines 22 and following do not survive.) <text:line-break/><text:span text:style-name="T1"> </text:span><text:span text:style-name="T2">(99/1) </text:span> [.....]ⲥⲉⲥⲁ.[ ] <text:line-break/><text:span text:style-name="T1"> </text:span><text:span text:style-name="T2">(99/2) </text:span> [.ϩⲩⲡⲁ]ⲣ̣ⲝⲓⲥ ⲙ[..........]ⲧ’ <text:line-break/><text:span text:style-name="T1"> </text:span><text:span text:style-name="T2">(99/3) </text:span> [......] ϩ̣ⲙ [.]ⲉ̣[ ]ⲉ̣ⲧ’ <text:line-break/><text:span text:style-name="T1"> </text:span><text:span text:style-name="T2">(99/4) </text:span> [ ]ⲩⲧ’ <text:line-break/><text:span text:style-name="T1"> </text:span><text:span text:style-name="T2">(99/5) </text:span> [ ⲉ]ⲓ̣ⲙⲉ <text:line-break/><text:span text:style-name="T1"> </text:span><text:span text:style-name="T2">(99/6) </text:span> [ ]ⲟϥ· <text:line-break/><text:span text:style-name="T1"> </text:span><text:span text:style-name="T2">(99/7) </text:span> [ ]ⲟⲛ <text:line-break/><text:span text:style-name="T1"> </text:span><text:span text:style-name="T2">(99/8) </text:span> [ ]ⲁⲣ <text:line-break/><text:span text:style-name="T1"> </text:span><text:span text:style-name="T2">(99/9) </text:span> [ ]ⲥ̣ⲥⲙⲟⲩ <text:line-break/><text:span text:style-name="T1"> </text:span><text:span text:style-name="T2">(99/10) </text:span> [ ]ⲁ <text:line-break/><text:span text:style-name="T1"> </text:span><text:span text:style-name="T2">(99/11) </text:span> [ ].ⲡ’ ⲛ <text:line-break/><text:span text:style-name="T1"> </text:span><text:span text:style-name="T2">(99/12) </text:span> [ ]ϫⲛ <text:line-break/><text:span text:style-name="T1"> </text:span><text:span text:style-name="T2">(99/13) </text:span> [ ].ⲁ̅ ⲛ <text:line-break/><text:span text:style-name="T1"> </text:span><text:span text:style-name="T2">(99/14) </text:span> [ ]ⲉⲧ’ <text:line-break/><text:span text:style-name="T1"> </text:span><text:span text:style-name="T2">(99/15) </text:span> [ ].ⲟⲩ <text:line-break/><text:span text:style-name="T1"> </text:span><text:span text:style-name="T2">(99/16) </text:span> [ ] ⲁ̣ⲩⲱ <text:line-break/><text:span text:style-name="T1"> </text:span><text:span text:style-name="T2">(99/17) </text:span> [ ]ⲁ <text:line-break/><text:span text:style-name="T1"> </text:span><text:span text:style-name="T2">(99/18) </text:span> [ ]ⲉ <text:line-break/><text:span text:style-name="T1"> </text:span><text:span text:style-name="T2">(99/19) </text:span> [ ]ⲧ’ <text:line-break/><text:span text:style-name="T1"> </text:span><text:span text:style-name="T2">(99/20) </text:span> [ ]ⲟ <text:line-break/><text:span text:style-name="T1"> </text:span><text:span text:style-name="T2">(99/21) </text:span> (Lines 21 and following do not survive.) <text:line-break/><text:soft-page-break/><text:span text:style-name="T1"> </text:span><text:span text:style-name="T2">(100/1) </text:span> ⲧ[.......]ϣⲟⲙ[.... <text:line-break/><text:span text:style-name="T1"> </text:span><text:span text:style-name="T2">(100/2) </text:span> ⲟ̣[.......]ⲉⲧⲉ[..... <text:line-break/><text:span text:style-name="T1"> </text:span><text:span text:style-name="T2">(100/3) </text:span> .[.......]ⲙ[.]ⲥ[.... <text:line-break/><text:span text:style-name="T1"> </text:span><text:span text:style-name="T2">(100/4) </text:span> ⲧⲉ.[ <text:line-break/><text:span text:style-name="T1"> </text:span><text:span text:style-name="T2">(100/5) </text:span> ⲛ ⲧ[ <text:line-break/><text:span text:style-name="T1"> </text:span><text:span text:style-name="T2">(100/6) </text:span> ⲁ̅ⲣ̅ⲙ̅[̅ⲟ̅ⲍ̅ⲏ̅ⲗ̅ <text:line-break/><text:span text:style-name="T1"> </text:span><text:span text:style-name="T2">(100/7) </text:span> ⲛⲥ̣[ <text:line-break/><text:span text:style-name="T1"> </text:span><text:span text:style-name="T2">(100/8) </text:span> ⲥⲓⲥ[ <text:line-break/><text:span text:style-name="T1"> </text:span><text:span text:style-name="T2">(100/9) </text:span> ⲡⲉ ϯⲃ.[ <text:line-break/><text:span text:style-name="T1"> </text:span><text:span text:style-name="T2">(100/10) </text:span> ϩⲓⲧ̣[ⲛ <text:line-break/><text:span text:style-name="T1"> </text:span><text:span text:style-name="T2">(100/11) </text:span> ϭⲟⲙ [ <text:line-break/><text:span text:style-name="T1"> </text:span><text:span text:style-name="T2">(100/12) </text:span> ⲣⲡ’ .[ <text:line-break/><text:span text:style-name="T1"> </text:span><text:span text:style-name="T2">(100/13) </text:span> ⲛ ⲥⲉ̣[ <text:line-break/><text:span text:style-name="T1"> </text:span><text:span text:style-name="T2">(100/14) </text:span> ϣⲱ[ <text:line-break/><text:span text:style-name="T1"> </text:span><text:span text:style-name="T2">(100/15) </text:span> ⲉⲧ[ <text:line-break/><text:span text:style-name="T1"> </text:span><text:span text:style-name="T2">(100/16) </text:span> ⲉⲃⲟ̣[ⲗ <text:line-break/><text:span text:style-name="T1"> </text:span><text:span text:style-name="T2">(100/17) </text:span> ⲉ[ <text:line-break/><text:span text:style-name="T1"> </text:span><text:span text:style-name="T2">(100/18) </text:span> ⲧⲟ̣[ <text:line-break/><text:span text:style-name="T1"> </text:span><text:span text:style-name="T2">(100/19) </text:span> ⲣⲡ [ <text:line-break/><text:span text:style-name="T1"> </text:span><text:span text:style-name="T2">(100/20) </text:span> ⲛ [ <text:line-break/><text:span text:style-name="T1"> </text:span><text:span text:style-name="T2">(100/21) </text:span> .[ <text:line-break/><text:span text:style-name="T1"> </text:span><text:span text:style-name="T2">(100/22) </text:span> (Lines 22 and following do not survive.) <text:line-break/><text:span text:style-name="T1"> </text:span><text:span text:style-name="T2">(101/1) </text:span> [.....].ⲁⲧⲛⲁⲩ ⲉ[ⲣⲟϥ.... <text:line-break/><text:span text:style-name="T1"> </text:span><text:span text:style-name="T2">(101/2) </text:span> [......].ⲩⲉ ⲡⲏ ⲉ̣[....... <text:line-break/><text:span text:style-name="T1"> </text:span><text:span text:style-name="T2">(101/3) </text:span> [.... ⲡ]ⲁ̣ⲓ̈ ⲡⲉ ⲡ̣ⲉⲥⲉ̣[.....]ⲧ’ <text:line-break/><text:span text:style-name="T1"> </text:span><text:span text:style-name="T2">(101/4) </text:span> [ ]ϫⲛ [...]ⲛⲱ‐ <text:line-break/><text:span text:style-name="T1"> </text:span><text:span text:style-name="T2">(101/5) </text:span> [ ]ⲙ̣ⲟⲟ̣[...]ⲉⲓⲇⲟⲥ <text:line-break/><text:span text:style-name="T1"> </text:span><text:span text:style-name="T2">(101/6) </text:span> [ ]ⲟⲛ <text:line-break/><text:span text:style-name="T1"> </text:span><text:span text:style-name="T2">(101/7) </text:span> [ ]ⲉⲥϩⲩ‐ <text:line-break/><text:span text:style-name="T1"> </text:span><text:span text:style-name="T2">(101/8) </text:span> [ ].ⲛ̅ ⲟⲩ‐ <text:line-break/><text:span text:style-name="T1"> </text:span><text:span text:style-name="T2">(101/9) </text:span> [ ]ⲁⲧ’‐ <text:line-break/><text:span text:style-name="T1"> </text:span><text:span text:style-name="T2">(101/10) </text:span> [ ]ⲥ ⲛ <text:line-break/><text:span text:style-name="T1"> </text:span><text:span text:style-name="T2">(101/11) </text:span> [ ]ϣⲉ <text:line-break/><text:span text:style-name="T1"> </text:span><text:span text:style-name="T2">(101/12) </text:span> [ ]ⲡ̣ⲓⲕ̅ⲗ̅ⲥ̅ <text:line-break/><text:span text:style-name="T1"> </text:span><text:span text:style-name="T2">(101/13) </text:span> [ ⲁ]ⲧ’ⲡⲱϣ <text:line-break/><text:span text:style-name="T1"> </text:span><text:span text:style-name="T2">(101/14) </text:span> [ ]ⲟϥ <text:line-break/><text:span text:style-name="T1"> </text:span><text:span text:style-name="T2">(101/15) </text:span> [ ].ⲉⲓ <text:line-break/><text:span text:style-name="T1"> </text:span><text:span text:style-name="T2">(101/16) </text:span> [ ].ⲉ <text:line-break/><text:span text:style-name="T1"> </text:span><text:span text:style-name="T2">(101/17) </text:span> [ ⲉⲛ]ⲛ̣ⲟⲓⲁ <text:line-break/><text:span text:style-name="T1"> </text:span><text:span text:style-name="T2">(101/18) </text:span> [ ]ⲉ <text:line-break/><text:span text:style-name="T1"> </text:span><text:span text:style-name="T2">(101/19) </text:span> [ ]ⲟⲉ <text:line-break/><text:span text:style-name="T1"> </text:span><text:span text:style-name="T2">(101/20) </text:span> (Lines 20 and following do not survive.) <text:line-break/><text:span text:style-name="T1"> </text:span><text:span text:style-name="T2">(102/1) </text:span> ⲡ̣[..... ⲉ]ⲧ’ϣⲟⲟⲡ’ [..... <text:line-break/><text:span text:style-name="T1"> </text:span><text:span text:style-name="T2">(102/2) </text:span> ⲡ̣[.......] ⲡⲓⲕⲉⲟ.[..... <text:line-break/><text:span text:style-name="T1"> </text:span><text:span text:style-name="T2">(102/3) </text:span> ⲟ̣[.....]ⲓ̣ⲱⲧ’ ⲟ̣ⲩϫ̣[..... <text:line-break/><text:span text:style-name="T1"> </text:span><text:span text:style-name="T2">(102/4) </text:span> ⲙⲛ [...]ⲛⲧ̣[ <text:line-break/><text:span text:style-name="T1"> </text:span><text:span text:style-name="T2">(102/5) </text:span> ⲣϥ ⲛ [...]ⲇⲟ[ <text:line-break/><text:soft-page-break/><text:span text:style-name="T1"> </text:span><text:span text:style-name="T2">(102/6) </text:span> ⲛ ⲟ[....].[ <text:line-break/><text:span text:style-name="T1"> </text:span><text:span text:style-name="T2">(102/7) </text:span> ⲟⲩⲇ̣[ <text:line-break/><text:span text:style-name="T1"> </text:span><text:span text:style-name="T2">(102/8) </text:span> ⲟⲩⲱ[ <text:line-break/><text:span text:style-name="T1"> </text:span><text:span text:style-name="T2">(102/9) </text:span> ⲉϥ[.]ⲧ̣[ <text:line-break/><text:span text:style-name="T1"> </text:span><text:span text:style-name="T2">(102/10) </text:span> ⲥⲉ[ <text:line-break/><text:span text:style-name="T1"> </text:span><text:span text:style-name="T2">(102/11) </text:span> ⲛⲁ[ <text:line-break/><text:span text:style-name="T1"> </text:span><text:span text:style-name="T2">(102/12) </text:span> ⲛⲱ[ <text:line-break/><text:span text:style-name="T1"> </text:span><text:span text:style-name="T2">(102/13) </text:span> ⲁⲩⲱ̣ [ <text:line-break/><text:span text:style-name="T1"> </text:span><text:span text:style-name="T2">(102/14) </text:span> ⲛⲏ[ <text:line-break/><text:span text:style-name="T1"> </text:span><text:span text:style-name="T2">(102/15) </text:span> ⲟⲩ[ <text:line-break/><text:span text:style-name="T1"> </text:span><text:span text:style-name="T2">(102/16) </text:span> ⲙ ⲙ[ <text:line-break/><text:span text:style-name="T1"> </text:span><text:span text:style-name="T2">(102/17) </text:span> ⲱ̣[ <text:line-break/><text:span text:style-name="T1"> </text:span><text:span text:style-name="T2">(102/18) </text:span> ⲉ[ <text:line-break/><text:span text:style-name="T1"> </text:span><text:span text:style-name="T2">(102/19) </text:span> ϩⲉⲛ̣[ <text:line-break/><text:span text:style-name="T1"> </text:span><text:span text:style-name="T2">(102/20) </text:span> ⲡ̣[ <text:line-break/><text:span text:style-name="T1"> </text:span><text:span text:style-name="T2">(102/21) </text:span> ⲙ [ <text:line-break/><text:span text:style-name="T1"> </text:span><text:span text:style-name="T2">(102/22) </text:span> (Lines 22 and following do not survive.) <text:line-break/><text:span text:style-name="T1"> </text:span><text:span text:style-name="T2">(103/1) </text:span> [.]ⲉⲛⲁⲣ̣ⲭⲏ ⲛ ⲧ̣[......... <text:line-break/><text:span text:style-name="T1"> </text:span><text:span text:style-name="T2">(103/2) </text:span> [..]ⲧ’̣ϣ̣ⲟ̣ⲟⲡ’ ⲟⲛ̣[ⲧⲱⲥ...]ⲉ <text:line-break/><text:span text:style-name="T1"> </text:span><text:span text:style-name="T2">(103/3) </text:span> [.]ⲧ’̣ϣ̣ⲟ̣ⲟⲡ’̣ [......ⲟⲩ]ⲥⲓⲁ <text:line-break/><text:span text:style-name="T1"> </text:span><text:span text:style-name="T2">(103/4) </text:span> [ ]ⲁ̣ⲓ̈ ϩⲙ <text:line-break/><text:span text:style-name="T1"> </text:span><text:span text:style-name="T2">(103/5) </text:span> [ ⲡⲁ]ⲓ̈ ⲡⲉ· <text:line-break/><text:span text:style-name="T1"> </text:span><text:span text:style-name="T2">(103/6) </text:span> [ ] ϯⲙⲛⲧ’‐ <text:line-break/><text:span text:style-name="T1"> </text:span><text:span text:style-name="T2">(103/7) </text:span> [ ]ⲉ̣ⲟⲩ‐ <text:line-break/><text:span text:style-name="T1"> </text:span><text:span text:style-name="T2">(103/8) </text:span> [ ]ⲟ̣ⲟⲩ <text:line-break/><text:span text:style-name="T1"> </text:span><text:span text:style-name="T2">(103/9) </text:span> [ ]ⲁⲥ <text:line-break/><text:span text:style-name="T1"> </text:span><text:span text:style-name="T2">(103/10) </text:span> [ ]ⲧ̣ⲟⲩ <text:line-break/><text:span text:style-name="T1"> </text:span><text:span text:style-name="T2">(103/11) </text:span> [ ⲉⲃ]ⲟⲗ <text:line-break/><text:span text:style-name="T1"> </text:span><text:span text:style-name="T2">(103/12) </text:span> [ ] ϣⲁⲩ‐ <text:line-break/><text:span text:style-name="T1"> </text:span><text:span text:style-name="T2">(103/13) </text:span> [ ]ⲁⲓ̈ ⲁⲛ <text:line-break/><text:span text:style-name="T1"> </text:span><text:span text:style-name="T2">(103/14) </text:span> [ ]ⲉⲧⲟⲩ <text:line-break/><text:span text:style-name="T1"> </text:span><text:span text:style-name="T2">(103/15) </text:span> [ ] ⲡ̣ⲁⲓ̈ <text:line-break/><text:span text:style-name="T1"> </text:span><text:span text:style-name="T2">(103/16) </text:span> [ ]ⲣ <text:line-break/><text:span text:style-name="T1"> </text:span><text:span text:style-name="T2">(103/17) </text:span> [ ]ⲗ <text:line-break/><text:span text:style-name="T1"> </text:span><text:span text:style-name="T2">(103/18) </text:span> [ ] <text:line-break/><text:span text:style-name="T1"> </text:span><text:span text:style-name="T2">(103/19) </text:span> [ ] ⲙⲛ <text:line-break/><text:span text:style-name="T1"> </text:span><text:span text:style-name="T2">(103/20) </text:span> (Lines 20 and following do not survive.) <text:line-break/><text:span text:style-name="T1"> </text:span><text:span text:style-name="T2">(104/1) </text:span> ⲙ [.........] ⲉⲥⲟⲩⲱⲛϩ ⲉ̣[ⲃⲟⲗ] <text:line-break/><text:span text:style-name="T1"> </text:span><text:span text:style-name="T2">(104/2) </text:span> ⲙ [.........] ⲛⲧⲉ̣ ⲛⲏ̣ ⲉⲧⲟ̣[... <text:line-break/><text:span text:style-name="T1"> </text:span><text:span text:style-name="T2">(104/3) </text:span> ⲏⲉ̣[.......].ⲁⲓ̈ [.]ⲏ ⲛ̣ⲧ̣ⲉ ⲡⲓ[.... <text:line-break/><text:span text:style-name="T1"> </text:span><text:span text:style-name="T2">(104/4) </text:span> ⲁⲩⲱ̣ [ <text:line-break/><text:span text:style-name="T1"> </text:span><text:span text:style-name="T2">(104/5) </text:span> ⲡⲁⲓ̈ ⲁ.[ <text:line-break/><text:span text:style-name="T1"> </text:span><text:span text:style-name="T2">(104/6) </text:span> ⲡⲓⲛⲟ.[ <text:line-break/><text:span text:style-name="T1"> </text:span><text:span text:style-name="T2">(104/7) </text:span> ⲉⲧⲟ̣[ <text:line-break/><text:span text:style-name="T1"> </text:span><text:span text:style-name="T2">(104/8) </text:span> ⲛⲁⲩ[ <text:line-break/><text:span text:style-name="T1"> </text:span><text:span text:style-name="T2">(104/9) </text:span> ⲛⲉ ⲡⲁ.[ <text:line-break/><text:span text:style-name="T1"> </text:span><text:span text:style-name="T2">(104/10) </text:span> ⲏⲣ[ <text:line-break/><text:soft-page-break/><text:span text:style-name="T1"> </text:span><text:span text:style-name="T2">(104/11) </text:span> ⲁⲧ’.[ <text:line-break/><text:span text:style-name="T1"> </text:span><text:span text:style-name="T2">(104/12) </text:span> ⲃⲟⲗ ⲙ [ <text:line-break/><text:span text:style-name="T1"> </text:span><text:span text:style-name="T2">(104/13) </text:span> ⲙⲙⲟ[ <text:line-break/><text:span text:style-name="T1"> </text:span><text:span text:style-name="T2">(104/14) </text:span> ⲁϥϣ[ <text:line-break/><text:span text:style-name="T1"> </text:span><text:span text:style-name="T2">(104/15) </text:span> ⲟⲛⲧⲱ̣[ⲥ <text:line-break/><text:span text:style-name="T1"> </text:span><text:span text:style-name="T2">(104/16) </text:span> ϣⲏ[ <text:line-break/><text:span text:style-name="T1"> </text:span><text:span text:style-name="T2">(104/17) </text:span> ⲡⲏ ⲉ[ <text:line-break/><text:span text:style-name="T1"> </text:span><text:span text:style-name="T2">(104/18) </text:span> ⲇⲉ [ <text:line-break/><text:span text:style-name="T1"> </text:span><text:span text:style-name="T2">(104/19) </text:span> ⲧ.[ <text:line-break/><text:span text:style-name="T1"> </text:span><text:span text:style-name="T2">(104/20) </text:span> ⲛϩⲣ̣[ⲁⲓ̈ <text:line-break/><text:span text:style-name="T1"> </text:span><text:span text:style-name="T2">(104/21) </text:span> ⲡⲓ̣.[ <text:line-break/><text:span text:style-name="T1"> </text:span><text:span text:style-name="T2">(104/22) </text:span> ⲣ[ <text:line-break/><text:span text:style-name="T1"> </text:span><text:span text:style-name="T2">(104/23) </text:span> ⲡ[ <text:line-break/><text:span text:style-name="T1"> </text:span><text:span text:style-name="T2">(104/24) </text:span> (Lines 24 and following do not survive.) <text:line-break/><text:span text:style-name="T1"> </text:span><text:span text:style-name="T2">(105/1) </text:span> ⲛⲉ ⲛⲏ ⲉⲧⲁϩⲉ̣[ⲣⲁⲧⲟⲩ....] ⲙ <text:line-break/><text:span text:style-name="T1"> </text:span><text:span text:style-name="T2">(105/2) </text:span> ⲡ̣ⲓⲉⲱⲛ ⲙ ⲙ[.........] ⲛ̣‐ <text:line-break/><text:span text:style-name="T1"> </text:span><text:span text:style-name="T2">(105/3) </text:span> ⲛ̣ⲏⲩ ⲉϩⲣⲁⲓ̈ ⲛ̣ ⲟ̣[........]ⲉ <text:line-break/><text:span text:style-name="T1"> </text:span><text:span text:style-name="T2">(105/4) </text:span> [...]ⲱⲧⲡ [.........] ⲉⲧ’ <text:line-break/><text:span text:style-name="T1"> </text:span><text:span text:style-name="T2">(105/5) </text:span> ϣⲟⲟⲡ’ ϩⲙ̣ [........]. ⲡⲏ <text:line-break/><text:span text:style-name="T1"> </text:span><text:span text:style-name="T2">(105/6) </text:span> ⲙⲉⲛ ⲉ̣[ ].ⲏⲣ <text:line-break/><text:span text:style-name="T1"> </text:span><text:span text:style-name="T2">(105/7) </text:span> [ ] ⲡⲏ <text:line-break/><text:span text:style-name="T1"> </text:span><text:span text:style-name="T2">(105/8) </text:span> [ ]ⲉ ⲟⲩⲁ <text:line-break/><text:span text:style-name="T1"> </text:span><text:span text:style-name="T2">(105/9) </text:span> [ ⲟ]ⲩⲁⲣⲭ̣ⲏ <text:line-break/><text:span text:style-name="T1"> </text:span><text:span text:style-name="T2">(105/10) </text:span> [ ]ⲟⲩⲧ’ <text:line-break/><text:span text:style-name="T1"> </text:span><text:span text:style-name="T2">(105/11) </text:span> [ ] ⲙⲛ <text:line-break/><text:span text:style-name="T1"> </text:span><text:span text:style-name="T2">(105/12) </text:span> [ ]ⲁ̣· ⲡⲁⲓ̈ <text:line-break/><text:span text:style-name="T1"> </text:span><text:span text:style-name="T2">(105/13) </text:span> [ ϩ]ⲩⲗⲏ <text:line-break/><text:span text:style-name="T1"> </text:span><text:span text:style-name="T2">(105/14) </text:span> [ ]ⲟ̣ⲩⲱⲧ’ <text:line-break/><text:span text:style-name="T1"> </text:span><text:span text:style-name="T2">(105/15) </text:span> [ ]ⲟⲩ ⲛ <text:line-break/><text:span text:style-name="T1"> </text:span><text:span text:style-name="T2">(105/16) </text:span> [ ϣⲟ]ⲟⲡ’ <text:line-break/><text:span text:style-name="T1"> </text:span><text:span text:style-name="T2">(105/17) </text:span> [ ]ⲁ <text:line-break/><text:span text:style-name="T1"> </text:span><text:span text:style-name="T2">(105/18) </text:span> [ ]ⲩ <text:line-break/><text:span text:style-name="T1"> </text:span><text:span text:style-name="T2">(105/19) </text:span> [ ]ⲉⲧ’ <text:line-break/><text:span text:style-name="T1"> </text:span><text:span text:style-name="T2">(105/20) </text:span> [ ] ⲙⲛ <text:line-break/><text:span text:style-name="T1"> </text:span><text:span text:style-name="T2">(105/21) </text:span> [ ]ⲁ̣ <text:line-break/><text:span text:style-name="T1"> </text:span><text:span text:style-name="T2">(105/22) </text:span> (Lines 22 and following do not survive.) <text:line-break/><text:span text:style-name="T1"> </text:span><text:span text:style-name="T2">(106/1) </text:span> ⲡ[.........] ⲁ̣ⲩⲱ ⲉϥϣⲟⲟ[ⲡ’ <text:line-break/><text:span text:style-name="T1"> </text:span><text:span text:style-name="T2">(106/2) </text:span> ⲉ[..........] ⲡⲉ ⲁⲩⲱ ⲛ ⲁ[ <text:line-break/><text:span text:style-name="T1"> </text:span><text:span text:style-name="T2">(106/3) </text:span> ⲡ[.........] ϣⲱⲗϩ ⲛⲧⲉ ⲟⲩ̣[ <text:line-break/><text:span text:style-name="T1"> </text:span><text:span text:style-name="T2">(106/4) </text:span> ⲧⲛⲟ[.........] ⲛ ⲟⲩⲁⲣ[ <text:line-break/><text:span text:style-name="T1"> </text:span><text:span text:style-name="T2">(106/5) </text:span> ⲁⲩ[........ ⲟ]ⲩⲇⲉ ⲛⲧⲉ ⲛ[ <text:line-break/><text:span text:style-name="T1"> </text:span><text:span text:style-name="T2">(106/6) </text:span> ⲙⲉϩ[ ]ⲉ ⲡⲏ ⲡ[ <text:line-break/><text:span text:style-name="T1"> </text:span><text:span text:style-name="T2">(106/7) </text:span> ⲉⲧⲟ̣[ ].[ <text:line-break/><text:span text:style-name="T1"> </text:span><text:span text:style-name="T2">(106/8) </text:span> ⲕⲟⲟ[ <text:line-break/><text:span text:style-name="T1"> </text:span><text:span text:style-name="T2">(106/9) </text:span> ⲡⲟⲩⲉ[ <text:line-break/><text:span text:style-name="T1"> </text:span><text:span text:style-name="T2">(106/10) </text:span> ⲙⲛ [ <text:line-break/><text:span text:style-name="T1"> </text:span><text:span text:style-name="T2">(106/11) </text:span> ⲧⲉ.[ <text:line-break/><text:soft-page-break/><text:span text:style-name="T1"> </text:span><text:span text:style-name="T2">(106/12) </text:span> ⲏⲡⲉ̣[ <text:line-break/><text:span text:style-name="T1"> </text:span><text:span text:style-name="T2">(106/13) </text:span> ⲱⲛϩ [ <text:line-break/><text:span text:style-name="T1"> </text:span><text:span text:style-name="T2">(106/14) </text:span> ⲕⲁⲧ[ⲁ <text:line-break/><text:span text:style-name="T1"> </text:span><text:span text:style-name="T2">(106/15) </text:span> ⲉⲧⲉ[ <text:line-break/><text:span text:style-name="T1"> </text:span><text:span text:style-name="T2">(106/16) </text:span> ⲣⲟⲩ[ <text:line-break/><text:span text:style-name="T1"> </text:span><text:span text:style-name="T2">(106/17) </text:span> ⲁⲩ[ <text:line-break/><text:span text:style-name="T1"> </text:span><text:span text:style-name="T2">(106/18) </text:span> ⲡⲁ[ <text:line-break/><text:span text:style-name="T1"> </text:span><text:span text:style-name="T2">(106/19) </text:span> ⲉⲁ[ <text:line-break/><text:span text:style-name="T1"> </text:span><text:span text:style-name="T2">(106/20) </text:span> ⲉⲧ[ <text:line-break/><text:span text:style-name="T1"> </text:span><text:span text:style-name="T2">(106/21) </text:span> ⲁ[ <text:line-break/><text:span text:style-name="T1"> </text:span><text:span text:style-name="T2">(106/22) </text:span> ⲩ̣[ <text:line-break/><text:span text:style-name="T1"> </text:span><text:span text:style-name="T2">(106/23) </text:span> (Lines 23 and following do not survive.) <text:line-break/><text:span text:style-name="T1"> </text:span><text:span text:style-name="T2">(107/1) </text:span> ⲙⲙⲟⲟⲩ ⲛϩⲣ[ⲁⲓ̈]......]ⲥ̣ <text:line-break/><text:span text:style-name="T1"> </text:span><text:span text:style-name="T2">(107/2) </text:span> [.]ⲁ̣ⲥⲓⲥ· ⲁⲩⲱ .[........]ⲉ̣ <text:line-break/><text:span text:style-name="T1"> </text:span><text:span text:style-name="T2">(107/3) </text:span> [ϩ]ⲩⲡⲁⲣⲝⲓⲥ̣ [........].ⲓ̣ⲥ <text:line-break/><text:span text:style-name="T1"> </text:span><text:span text:style-name="T2">(107/4) </text:span> .[.]ⲱ ⲙⲛ ⲡ[.....ϣ]ⲟ̣ⲟⲡ’ <text:line-break/><text:span text:style-name="T1"> </text:span><text:span text:style-name="T2">(107/5) </text:span> ⲙ ⲡⲣⲏⲧⲉ̣ [........]ⲟⲩ <text:line-break/><text:span text:style-name="T1"> </text:span><text:span text:style-name="T2">(107/6) </text:span> ⲉⲓⲇ[ⲱⲗⲟⲛ ϣ]ⲟⲣⲡ’ <text:line-break/><text:span text:style-name="T1"> </text:span><text:span text:style-name="T2">(107/7) </text:span> [ ]ⲙ <text:line-break/><text:span text:style-name="T1"> </text:span><text:span text:style-name="T2">(107/8) </text:span> [ ϣ]ⲟ̣ⲣⲡ’ <text:line-break/><text:span text:style-name="T1"> </text:span><text:span text:style-name="T2">(107/9) </text:span> [ ] ⲛⲧⲉ ⲛⲓ‐ <text:line-break/><text:span text:style-name="T1"> </text:span><text:span text:style-name="T2">(107/10) </text:span> [ ]ⲁ <text:line-break/><text:span text:style-name="T1"> </text:span><text:span text:style-name="T2">(107/11) </text:span> [ ]ⲛ ⲛ <text:line-break/><text:span text:style-name="T1"> </text:span><text:span text:style-name="T2">(107/12) </text:span> [ ] ⲡⲁⲓ̈ <text:line-break/><text:span text:style-name="T1"> </text:span><text:span text:style-name="T2">(107/13) </text:span> [ ].ⲁ <text:line-break/><text:span text:style-name="T1"> </text:span><text:span text:style-name="T2">(107/14) </text:span> [ ] ϣⲟⲙ‐ <text:line-break/><text:span text:style-name="T1"> </text:span><text:span text:style-name="T2">(107/15) </text:span> [ ]ⲟⲩ <text:line-break/><text:span text:style-name="T1"> </text:span><text:span text:style-name="T2">(107/16) </text:span> [ ] <text:line-break/><text:span text:style-name="T1"> </text:span><text:span text:style-name="T2">(107/17) </text:span> [ ]ⲁ̣ ⲛ <text:line-break/><text:span text:style-name="T1"> </text:span><text:span text:style-name="T2">(107/18) </text:span> [ ]ⲁ̣ⲓ̈ <text:line-break/><text:span text:style-name="T1"> </text:span><text:span text:style-name="T2">(107/19) </text:span> [ ]ⲉ̣ⲓ̈ <text:line-break/><text:span text:style-name="T1"> </text:span><text:span text:style-name="T2">(107/20) </text:span> [ ]. <text:line-break/><text:span text:style-name="T1"> </text:span><text:span text:style-name="T2">(107/21) </text:span> [ ⲟ]ⲩⲁ· <text:line-break/><text:span text:style-name="T1"> </text:span><text:span text:style-name="T2">(107/22) </text:span> (Lines 22 and following do not survive.) <text:line-break/><text:span text:style-name="T1"> </text:span><text:span text:style-name="T2">(108/1) </text:span> ⲁ[.........]ⲛⲉ ⲁⲛ ⲉⲩϯ ⲛⲁ̣[. <text:line-break/><text:span text:style-name="T1"> </text:span><text:span text:style-name="T2">(108/2) </text:span> ϩⲙ̣ [.......] ⲡⲏ ⲉⲧ’ϣⲟⲟⲡ’̣ [ <text:line-break/><text:span text:style-name="T1"> </text:span><text:span text:style-name="T2">(108/3) </text:span> ⲉⲃ[ⲟⲗ .......] ⲧ̣ⲏⲣⲟⲩ ⲙⲛ̣ <text:line-break/><text:span text:style-name="T1"> </text:span><text:span text:style-name="T2">(108/4) </text:span> ⲡⲏ ⲉ[.........] ⲟ̣ⲩⲙⲏⲏ̣ϣ̣[ⲉ <text:line-break/><text:span text:style-name="T1"> </text:span><text:span text:style-name="T2">(108/5) </text:span> ⲛ ⲥⲭⲏ̣[..........]ⲧ̣ⲁⲙⲓⲟ ⲏ [. <text:line-break/><text:span text:style-name="T1"> </text:span><text:span text:style-name="T2">(108/6) </text:span> ⲧⲁⲡ[ ].[.. <text:line-break/><text:span text:style-name="T1"> </text:span><text:span text:style-name="T2">(108/7) </text:span> ⲁⲩⲱ [ <text:line-break/><text:span text:style-name="T1"> </text:span><text:span text:style-name="T2">(108/8) </text:span> ⲉⲃⲟⲗ [ <text:line-break/><text:span text:style-name="T1"> </text:span><text:span text:style-name="T2">(108/9) </text:span> ⲧⲁⲝⲓⲥ ⲙ̣[ <text:line-break/><text:span text:style-name="T1"> </text:span><text:span text:style-name="T2">(108/10) </text:span> ⲡⲓⲁ[ⲧ’ <text:line-break/><text:span text:style-name="T1"> </text:span><text:span text:style-name="T2">(108/11) </text:span> ϣⲟⲙ[ <text:line-break/><text:span text:style-name="T1"> </text:span><text:span text:style-name="T2">(108/12) </text:span> ϩⲙ ⲡⲓ̣[ <text:line-break/><text:span text:style-name="T1"> </text:span><text:span text:style-name="T2">(108/13) </text:span> ⲛⲁⲓ̈· .[ <text:line-break/><text:soft-page-break/><text:span text:style-name="T1"> </text:span><text:span text:style-name="T2">(108/14) </text:span> ⲛⲓϣⲟ̣[ <text:line-break/><text:span text:style-name="T1"> </text:span><text:span text:style-name="T2">(108/15) </text:span> ⲛⲧⲉ̣ [ <text:line-break/><text:span text:style-name="T1"> </text:span><text:span text:style-name="T2">(108/16) </text:span> ⲟⲛϩ .[ <text:line-break/><text:span text:style-name="T1"> </text:span><text:span text:style-name="T2">(108/17) </text:span> ⲉⲡ[ <text:line-break/><text:span text:style-name="T1"> </text:span><text:span text:style-name="T2">(108/18) </text:span> ⲟⲟ[ <text:line-break/><text:span text:style-name="T1"> </text:span><text:span text:style-name="T2">(108/19) </text:span> ⲟⲩ[ <text:line-break/><text:span text:style-name="T1"> </text:span><text:span text:style-name="T2">(108/20) </text:span> ⲉⲩ[ <text:line-break/><text:span text:style-name="T1"> </text:span><text:span text:style-name="T2">(108/21) </text:span> ϩⲛ̣ [ <text:line-break/><text:span text:style-name="T1"> </text:span><text:span text:style-name="T2">(108/22) </text:span> ⲧ[ <text:line-break/><text:span text:style-name="T1"> </text:span><text:span text:style-name="T2">(108/23) </text:span> (Lines 23 and following do not survive.) <text:line-break/><text:span text:style-name="T1"> </text:span><text:span text:style-name="T2">(109/1) </text:span> (Page 109 does not survive.) <text:line-break/><text:span text:style-name="T1"> </text:span><text:span text:style-name="T2">(110/1) </text:span> (Page 110 does not survive.) <text:line-break/><text:span text:style-name="T1"> </text:span><text:span text:style-name="T2">(111/1) </text:span> (Page 111 does not survive.) <text:line-break/><text:span text:style-name="T1"> </text:span><text:span text:style-name="T2">(112/1) </text:span> (Page 112 does not survive.) <text:line-break/><text:span text:style-name="T1"> </text:span><text:span text:style-name="T2">(113/1) </text:span> ⲙⲛ ϩⲉⲛⲁⲅⲅⲉⲗⲟⲥ̣ ⲙⲛ ϩⲉ̣ⲛ̣ⲇⲉ‐ <text:line-break/><text:span text:style-name="T1"> </text:span><text:span text:style-name="T2">(113/2) </text:span> ⲙⲱⲛ ⲁⲩⲱ ϩⲉⲛⲛⲟⲩⲥ ⲙ[ⲛ] ϩⲉⲛ‐ <text:line-break/><text:span text:style-name="T1"> </text:span><text:span text:style-name="T2">(113/3) </text:span> ⲯⲩⲭⲏ· ⲁⲩⲱ ϩⲉⲛⲍⲱⲟⲛ [ⲙ]ⲛ <text:line-break/><text:span text:style-name="T1"> </text:span><text:span text:style-name="T2">(113/4) </text:span> ϩⲉⲛϣⲏⲛ ⲙⲛ ϩⲉⲛⲥⲱⲙⲁ ⲙⲛ <text:line-break/><text:span text:style-name="T1"> </text:span><text:span text:style-name="T2">(113/5) </text:span> ⲛ̣ⲏ ⲉⲧ’ϣⲟⲟⲡ’ ϩⲁ ⲑⲏ ⲛ ⲛⲁⲓ̈· ⲛⲏ <text:line-break/><text:span text:style-name="T1"> </text:span><text:span text:style-name="T2">(113/6) </text:span> ⲛⲧⲉ ⲛⲓϩⲁⲡⲗⲟⲩⲛ ⲛ ⲥ̣ⲧⲟⲓⲭⲓⲱⲛ <text:line-break/><text:span text:style-name="T1"> </text:span><text:span text:style-name="T2">(113/7) </text:span> ⲛⲧⲉ ⲛⲓⲁⲣⲭⲏ̣ ⲛ ϩⲁⲡⲗ̣[ⲟ]ⲩ̣[ⲛ]· ⲙⲛ <text:line-break/><text:span text:style-name="T1"> </text:span><text:span text:style-name="T2">(113/8) </text:span> ⲛ[ⲏ ⲉ]ⲧ’ϣⲟⲟⲡ’ ϩⲛ [ⲟⲩ]ϫⲱϣ <text:line-break/><text:span text:style-name="T1"> </text:span><text:span text:style-name="T2">(113/9) </text:span> ⲉ[...] ⲁⲩⲱ ⲛ ⲁⲧ’ⲙⲟⲩϫϭ ⲟⲩⲁⲏⲣ <text:line-break/><text:span text:style-name="T1"> </text:span><text:span text:style-name="T2">(113/10) </text:span> [ⲙⲛ ⲟ]ⲩⲙⲟⲟⲩ ⲁⲩⲱ ⲟⲩⲕⲁϩ <text:line-break/><text:span text:style-name="T1"> </text:span><text:span text:style-name="T2">(113/11) </text:span> [ⲙ]ⲛ ⲟⲩⲏⲡⲉ ⲁⲩⲱ ⲟⲩ̣ⲛ̣[ⲟ]ⲩϩⲃ <text:line-break/><text:span text:style-name="T1"> </text:span><text:span text:style-name="T2">(113/12) </text:span> ⲙ̣ⲛ ⲟⲩⲕⲓⲙ ⲁⲩⲱ ⲟ[ⲩ...]ⲟϣ ⲙⲛ <text:line-break/><text:span text:style-name="T1"> </text:span><text:span text:style-name="T2">(113/13) </text:span> [ⲟ]ⲩ̣ⲧⲁⲝⲓⲥ ⲁⲩⲱ ⲟⲩ̣ⲛⲓϥⲉ ⲙⲛ <text:line-break/><text:span text:style-name="T1"> </text:span><text:span text:style-name="T2">(113/14) </text:span> [ⲛⲓⲕ]ⲉ̣ϣⲱϫⲡ’ ⲧⲏⲣⲟⲩ· ϩⲉⲛⲙⲉϩ <text:line-break/><text:span text:style-name="T1"> </text:span><text:span text:style-name="T2">(113/15) </text:span> [ϥⲧ]ⲟⲟⲩ ⲇ̣ⲉ ⲛ ϭⲟⲙ ⲛⲉ ⲉⲧ̣ϣⲟⲟⲡ’ <text:line-break/><text:span text:style-name="T1"> </text:span><text:span text:style-name="T2">(113/16) </text:span> [ϩⲙ] ⲡⲓⲙ[ⲉϩ]ϥⲧⲟ̣ⲟ̣ⲩ ⲛⲛ ⲉⲱⲛ· ⲛⲏ <text:line-break/><text:span text:style-name="T1"> </text:span><text:span text:style-name="T2">(113/17) </text:span> [ⲉⲧ]ϣ̣[ⲟ]ⲟ̣ⲡ’ ϩⲛ ⲛⲓⲡ[.].[.] ⲁ̣ⲩⲱ <text:line-break/><text:span text:style-name="T1"> </text:span><text:span text:style-name="T2">(113/18) </text:span> [.]ϫ̣ⲱⲕ ⲉⲃⲟⲗ ⲛⲧⲉ̣ [...] ⲛⲓϭⲟⲙ <text:line-break/><text:span text:style-name="T1"> </text:span><text:span text:style-name="T2">(113/19) </text:span> [...]ϩⲉⲛϭⲟⲙ ϩⲉⲛ[...]ⲥ ⲛⲧⲉ <text:line-break/><text:span text:style-name="T1"> </text:span><text:span text:style-name="T2">(113/20) </text:span> [...]ⲟ̣ⲩ· ϩⲉⲛⲅ̣[....] ⲛⲧⲉ <text:line-break/><text:span text:style-name="T1"> </text:span><text:span text:style-name="T2">(113/21) </text:span> [........] ϩⲉⲛ̣[ⲁⲅⲅⲉⲗ]ⲟ̣ⲥ ⲛ <text:line-break/><text:span text:style-name="T1"> </text:span><text:span text:style-name="T2">(113/22) </text:span> [ⲧⲉ ⲛⲓⲁ]ⲅ̣ⲅⲉⲗⲟⲥ̣ [ϩⲉⲛ]ⲯⲩⲭ̣ⲏ̣ <text:line-break/><text:span text:style-name="T1"> </text:span><text:span text:style-name="T2">(113/23) </text:span> [ⲛ̅ⲧⲉ ⲛⲓ]ⲯⲩⲭⲏ· ϩⲉ[ⲛ]ⲍⲱⲟⲛ [ⲛ] <text:line-break/><text:span text:style-name="T1"> </text:span><text:span text:style-name="T2">(113/24) </text:span> [ⲧⲉ ⲛⲓⲍ]ⲱⲟⲛ ϩⲉⲛ̣ϣⲏ̣ⲛ̣ ⲛ[ⲧⲉ] <text:line-break/><text:span text:style-name="T1"> </text:span><text:span text:style-name="T2">(113/25) </text:span> [ⲛⲓϣⲏⲛ]· ϩⲉⲛⲥⲩ[.].[.... <text:line-break/><text:span text:style-name="T1"> </text:span><text:span text:style-name="T2">(113/26) </text:span> [.....] ⲁⲩⲱ ϩ[ⲉⲛ...... <text:line-break/><text:span text:style-name="T1"> </text:span><text:span text:style-name="T2">(113/27) </text:span> [.....]ⲁⲧⲁ̣ⲩ̣[......... <text:line-break/><text:span text:style-name="T1"> </text:span><text:span text:style-name="T2">(113/28) </text:span> [......].[ <text:line-break/><text:span text:style-name="T1"> </text:span><text:span text:style-name="T2">(114/1) </text:span> ⲙⲙⲓⲛ ⲙⲙⲟϥ· ⲁⲩⲱ ⲟⲩⲟⲛ ⲛ[ⲏ] <text:line-break/><text:span text:style-name="T1"> </text:span><text:span text:style-name="T2">(114/2) </text:span> ⲙⲉ̣ⲛ ϩⲱⲥ ⲉϩⲉⲛϫⲡⲟ ⲛⲉ· ⲙⲛ <text:line-break/><text:span text:style-name="T1"> </text:span><text:span text:style-name="T2">(114/3) </text:span> ⲛ̣[ⲏ] ⲙⲉⲛ ⲉⲧ’ϣⲟⲟⲡ’ ϩⲛ ⲟⲩϫⲡⲟ <text:line-break/><text:span text:style-name="T1"> </text:span><text:span text:style-name="T2">(114/4) </text:span> ⲛⲛ ⲁⲧⲙⲓⲥⲉ· ⲁⲩⲱ ⲟⲩⲟⲛ ⲛⲏ ⲙ̣[ⲉⲛ] <text:line-break/><text:span text:style-name="T1"> </text:span><text:span text:style-name="T2">(114/5) </text:span> ⲉⲧⲟⲩⲁⲁⲃ· ⲁⲩⲱ ⲉϩⲉⲛϣⲁ ⲉ[ⲛⲉϩ] <text:line-break/><text:soft-page-break/><text:span text:style-name="T1"> </text:span><text:span text:style-name="T2">(114/6) </text:span> ⲛⲉ· ⲙⲛ̣ ⲛⲓⲁⲧ’ⲟⲩⲱⲧⲃ ⲉⲃⲟⲗ ⲛ̣‐ <text:line-break/><text:span text:style-name="T1"> </text:span><text:span text:style-name="T2">(114/7) </text:span> ϩⲣⲁⲓ̣̈ [ϩⲛ ⲟ]ⲩ〈ⲟⲩ〉ⲱⲧⲃ ⲉⲃⲟⲗ· ⲙⲛ ⲟⲩ‐ <text:line-break/><text:span text:style-name="T1"> </text:span><text:span text:style-name="T2">(114/8) </text:span> ⲧⲁⲕⲟ [ⲛϩⲣ]ⲁⲓ̈ ϩⲛ ⲟⲩⲙⲛⲧ’ⲁ̣[ⲧ]ⲧⲁⲕⲟ· <text:line-break/><text:span text:style-name="T1"> </text:span><text:span text:style-name="T2">(114/9) </text:span> ⲁⲩⲱ ⲟⲩ̣ⲟⲛ ⲛⲏ ⲙⲉⲛ ϩⲱ̣[ⲥ] ⲉϩⲉ̣ⲛ̣‐ <text:line-break/><text:span text:style-name="T1"> </text:span><text:span text:style-name="T2">(114/10) </text:span> ⲧⲏⲣⲟⲩ ⲛⲉ· ⲟⲩⲟⲛ ⲛⲏ ⲉ[ϩⲉⲛ ⲅⲉ]‐ <text:line-break/><text:span text:style-name="T1"> </text:span><text:span text:style-name="T2">(114/11) </text:span> ⲛⲟⲥ ⲛⲉ ⲙⲛ ⲛⲏ ⲉⲧ’ϣⲟⲟⲡ’ [ϩⲛ ⲟ]ⲩ̣‐ <text:line-break/><text:span text:style-name="T1"> </text:span><text:span text:style-name="T2">(114/12) </text:span> ⲕⲟⲥ̣[ⲙⲟ]ⲥ ⲙⲛ ⲟⲩⲧⲁⲝⲓⲥ· ⲟⲩ[ⲟⲛ] <text:line-break/><text:span text:style-name="T1"> </text:span><text:span text:style-name="T2">(114/13) </text:span> ⲛⲏ ⲙⲉⲛ̣ ϩⲛ ⲟⲩⲙⲛⲧ’ⲁⲧ’ⲧ̣[ⲁⲕⲟ] <text:line-break/><text:span text:style-name="T1"> </text:span><text:span text:style-name="T2">(114/14) </text:span> ⲁⲩⲱ ⲟⲩⲟⲛ ⲛⲓϣⲟⲣⲡ’ ⲉ̣[ⲧⲁϩⲉ]‐ <text:line-break/><text:span text:style-name="T1"> </text:span><text:span text:style-name="T2">(114/15) </text:span> ⲣⲁⲧⲟⲩ ⲙⲛ ⲛⲓⲙⲉϩⲥ̣ⲛ̣ⲁⲩ [ϩⲛ] <text:line-break/><text:span text:style-name="T1"> </text:span><text:span text:style-name="T2">(114/16) </text:span> ⲛⲁⲓ̈ ⲧⲏⲣⲟⲩ· ⲛⲏ ⲧ[ⲏⲣ]ⲟⲩ [ⲉⲧϣⲟ]‐ <text:line-break/><text:span text:style-name="T1"> </text:span><text:span text:style-name="T2">(114/17) </text:span> ⲟⲡ’̣ [ⲉⲃ]ⲟ̣[ⲗ ϩ]ⲛ ⲛⲁⲓ̈· ⲁⲩⲱ̣ ⲛ̣ⲏ̣ [ⲉⲧ]‐ <text:line-break/><text:span text:style-name="T1"> </text:span><text:span text:style-name="T2">(114/18) </text:span> ϣⲟⲟⲡ’̣ [ϩⲛ] ⲛⲁⲓ̈· ⲁⲩⲱ ⲉ̣[.... <text:line-break/><text:span text:style-name="T1"> </text:span><text:span text:style-name="T2">(114/19) </text:span> ⲛⲁⲓ̈ ⲉⲧ̣[ⲟⲩ]ⲏϩ ⲛⲥⲁ ⲛⲁⲓ̈ [..... <text:line-break/><text:span text:style-name="T1"> </text:span><text:span text:style-name="T2">(114/20) </text:span> ⲃⲟⲗ ⲙ [....]ⲩ ⲉ[......... <text:line-break/><text:span text:style-name="T1"> </text:span><text:span text:style-name="T2">(114/21) </text:span> ⲛⲁⲓ̈ [.....] ⲉⲩⲟⲩ[...... <text:line-break/><text:span text:style-name="T1"> </text:span><text:span text:style-name="T2">(114/22) </text:span> ⲁⲩⲱ ⲁ[ⲩⲁ]ϩⲉⲣⲁⲧⲟ[ⲩ ...... <text:line-break/><text:span text:style-name="T1"> </text:span><text:span text:style-name="T2">(114/23) </text:span> [ⲙ]ⲉϩϥⲧⲟⲟⲩ ⲛⲛ ⲉⲱ̣[ⲛ.... <text:line-break/><text:span text:style-name="T1"> </text:span><text:span text:style-name="T2">(114/24) </text:span> [.....] ⲉⲩ̣ϣⲟⲟⲡ’ [...... <text:line-break/><text:span text:style-name="T1"> </text:span><text:span text:style-name="T2">(114/25) </text:span> [........]ⲉ ⲉⲩϣⲟ̣[..... <text:line-break/><text:span text:style-name="T1"> </text:span><text:span text:style-name="T2">(114/26) </text:span> [........]. ⲧⲏⲣ. [...... <text:line-break/><text:span text:style-name="T1"> </text:span><text:span text:style-name="T2">(115/1) </text:span> ⲛϩⲏⲧⲟⲩ ⲉϥϫⲟⲟⲣ ⲉⲃⲟⲗ· ⲁⲩⲱ <text:line-break/><text:span text:style-name="T1"> </text:span><text:span text:style-name="T2">(115/2) </text:span> ⲉⲛⲥⲉϩⲟϫϩⲉϫ ⲛ ⲛⲉⲩⲉⲣⲏⲩ [ⲁ]ⲛ̣ <text:line-break/><text:span text:style-name="T1"> </text:span><text:span text:style-name="T2">(115/3) </text:span> ⲁⲗⲗⲁ ⲛⲧⲟⲟⲩ ϩⲱⲟⲩ ⲉⲩⲟⲛϩ ⲛ‐ <text:line-break/><text:span text:style-name="T1"> </text:span><text:span text:style-name="T2">(115/4) </text:span> [ϩ]ⲣ̣ⲁⲓ̈ ⲛϩⲏⲧⲟⲩ ⲉⲩϣⲟⲟⲡ’ ⲁⲩⲱ <text:line-break/><text:span text:style-name="T1"> </text:span><text:span text:style-name="T2">(115/5) </text:span> ⲉ̣ⲩϯ ⲙⲁⲧⲉ ⲙⲛ ⲛⲉⲩⲉⲣⲏⲩ ϩⲱⲥ <text:line-break/><text:span text:style-name="T1"> </text:span><text:span text:style-name="T2">(115/6) </text:span> [ⲉ]ⲩϣⲟⲟⲡ’ ⲉⲃⲟⲗ ϩⲛ ⲟⲩⲁⲣⲭⲏ ⲛ <text:line-break/><text:span text:style-name="T1"> </text:span><text:span text:style-name="T2">(115/7) </text:span> ⲟ̣ⲩⲱⲧ’· ⲁⲩⲱ ⲥⲉϣⲟ[ⲟⲡ’] ⲉⲩϩⲟ‐ <text:line-break/><text:span text:style-name="T1"> </text:span><text:span text:style-name="T2">(115/8) </text:span> ⲧⲡ’̣ [ϫ]ⲉ ⲥⲉϣⲟⲟⲡ’ ⲧⲏⲣⲟⲩ ⲛϩⲣⲁⲓ̈ <text:line-break/><text:span text:style-name="T1"> </text:span><text:span text:style-name="T2">(115/9) </text:span> ϩⲛ ⲟ̣[ⲩ]ⲉⲱⲛ ⲛ ⲟⲩⲱⲧ’ ⲛⲧⲉ ⲡⲓⲕ̅ⲗ̅ⲥ̅ <text:line-break/><text:span text:style-name="T1"> </text:span><text:span text:style-name="T2">(115/10) </text:span> [...].ⲉ ϩⲛ ⲟⲩϭⲟⲙ ⲉⲩⲡⲟⲣϫ ⲉⲃⲟⲗ· <text:line-break/><text:span text:style-name="T1"> </text:span><text:span text:style-name="T2">(115/11) </text:span> [ⲕ]ⲁ̣ⲧⲁ ⲅⲁⲣ ⲡⲟⲩⲁ ⲡⲟⲩⲁ ·ⲛⲧⲉ ⲛⲓⲉ‐ <text:line-break/><text:span text:style-name="T1"> </text:span><text:span text:style-name="T2">(115/12) </text:span> [ⲱ]ⲛ̣ ⲥⲉϣⲟⲟⲡ’ ⲉⲩⲁϩⲉⲣⲁⲧⲟⲩ <text:line-break/><text:span text:style-name="T1"> </text:span><text:span text:style-name="T2">(115/13) </text:span> [ⲕⲁ]ⲧⲁ ⲡⲏ ⲉⲧ’ⲡⲏϩ ⲉⲣⲟⲟⲩ· ⲡⲓⲕ̅ⲗ̅ⲥ̅ <text:line-break/><text:span text:style-name="T1"> </text:span><text:span text:style-name="T2">(115/14) </text:span> [ⲇⲉ ⲟ]ⲩⲉⲱⲛ ⲛ ⲟⲩⲱⲧ’ ⲡⲉ ⲟⲩⲛ‐ <text:line-break/><text:span text:style-name="T1"> </text:span><text:span text:style-name="T2">(115/15) </text:span> [ⲧⲁϥ] ⲙ̣ⲙⲁⲩ ⲛ ϥⲧⲟⲟⲩ ⲛ ⲇⲓⲁⲫⲟ‐ <text:line-break/><text:span text:style-name="T1"> </text:span><text:span text:style-name="T2">(115/16) </text:span> [ⲣⲁ ⲛ]ⲧⲉ ϩⲉⲛⲉⲱⲛ· ⲁⲩⲱ ⲕⲁⲧⲁ <text:line-break/><text:span text:style-name="T1"> </text:span><text:span text:style-name="T2">(115/17) </text:span> [ⲡⲟ]ⲩ̣ⲁ ⲡⲟⲩⲁ ⲛⲧⲉ ⲛⲓⲉⲱⲛ ⲟⲩⲛ‐ <text:line-break/><text:span text:style-name="T1"> </text:span><text:span text:style-name="T2">(115/18) </text:span> [ⲧⲁ]ⲩ̣ ⲙⲙⲁⲩ ⲛ ϩⲉⲛ[ϭⲟ]ⲙ̣ ⲙ ⲡⲣⲏ‐ <text:line-break/><text:span text:style-name="T1"> </text:span><text:span text:style-name="T2">(115/19) </text:span> [ⲧⲉ ⲛ] ϩ̣ⲉⲛϣⲟⲣⲡ’ ⲁⲛ ⲙⲛ ϩⲉⲛⲙⲉϩ‐ <text:line-break/><text:span text:style-name="T1"> </text:span><text:span text:style-name="T2">(115/20) </text:span> [ⲥⲛⲁ]ⲩ̣ ⲛ̣ⲁⲓ̈ ⲧⲏⲣⲟⲩ ⲅⲁⲣ ϩⲉⲛϣⲁ ⲉ‐ <text:line-break/><text:span text:style-name="T1"> </text:span><text:span text:style-name="T2">(115/21) </text:span> [ⲛⲉϩ ⲛⲉ ⲁⲩ]ⲱ̣ [ⲥ]ⲉϣ[ⲉ]ⲃ̣ⲓ̣ⲏⲟⲩⲧ’ <text:line-break/><text:span text:style-name="T1"> </text:span><text:span text:style-name="T2">(115/22) </text:span> [..... ⲟ]ⲩⲧⲁⲝⲓⲥ ⲙ[ⲛ] ⲟⲩⲉⲟⲟⲩ <text:line-break/><text:span text:style-name="T1"> </text:span><text:span text:style-name="T2">(115/23) </text:span> [......].ⲉ ⲉⲧ’ϣⲟ[ⲟ]ⲡ’ ⲛϩ[ⲣⲁ]ⲓ̈ <text:line-break/><text:span text:style-name="T1"> </text:span><text:span text:style-name="T2">(115/24) </text:span> [ϩⲛ ....]ϥⲧⲟⲟⲩ ⲛ̣ⲛ ⲉⲱⲛ [ⲙ]ⲛ̣ <text:line-break/><text:span text:style-name="T1"> </text:span><text:span text:style-name="T2">(115/25) </text:span> [.....ⲉ]ⲧⲣ ϣⲟⲣⲡ̣ ⲛ ϣ̣[ⲟⲟⲡ’] <text:line-break/><text:span text:style-name="T1"> </text:span><text:span text:style-name="T2">(115/26) </text:span> [.......]ⲛⲟⲩⲧ[ⲉ <text:line-break/><text:soft-page-break/><text:span text:style-name="T1"> </text:span><text:span text:style-name="T2">(115/27) </text:span> [......]ⲥ ⲛⲉ ⲙ[ <text:line-break/><text:span text:style-name="T1"> </text:span><text:span text:style-name="T2">(115/28) </text:span> [........]..[ <text:line-break/><text:span text:style-name="T1"> </text:span><text:span text:style-name="T2">(116/1) </text:span> ⲛⲁⲓ̈ ⲧⲏⲣⲟⲩ ⲇⲉ ⲥⲉϣⲟⲟⲡ’ ⲛ‐ <text:line-break/><text:span text:style-name="T1"> </text:span><text:span text:style-name="T2">(116/2) </text:span> ϩⲣⲁ̣ⲓ̈ ϩⲛ ⲟⲩⲁ ⲉⲩϣⲟⲟⲡ’ ϩⲓ ⲟⲩⲙⲁ <text:line-break/><text:span text:style-name="T1"> </text:span><text:span text:style-name="T2">(116/3) </text:span> ⲁⲩⲱ ⲕⲁⲧⲁ ⲟⲩⲁ ⲉⲩϫⲏⲕ ⲉⲃⲟⲗ <text:line-break/><text:span text:style-name="T1"> </text:span><text:span text:style-name="T2">(116/4) </text:span> ⲛϩⲣⲁⲓ̈ ϩⲛ ⲟⲩⲙⲛⲧ’ϣⲃⲏⲣ ⲁⲩ[ⲱ] <text:line-break/><text:span text:style-name="T1"> </text:span><text:span text:style-name="T2">(116/5) </text:span> ⲉⲁⲩⲙⲟⲩϩ ⲉⲃⲟⲗ ⲙ ⲡⲓⲉⲱⲛ ⲉ[ⲧ’]‐ <text:line-break/><text:span text:style-name="T1"> </text:span><text:span text:style-name="T2">(116/6) </text:span> ϣⲟⲟⲡ’ [ⲟ]ⲛⲧⲱⲥ· ⲁⲩⲱ ⲟⲩⲟⲛ̣ <text:line-break/><text:span text:style-name="T1"> </text:span><text:span text:style-name="T2">(116/7) </text:span> ⲛⲏ ⲙⲉ̣[ⲛ] ⲛ̣ϩⲏⲧⲟⲩ ⲉⲧⲁϩⲉⲣⲁⲧⲟⲩ <text:line-break/><text:span text:style-name="T1"> </text:span><text:span text:style-name="T2">(116/8) </text:span> ϩⲱⲥ ⲉⲩϣⲟⲟⲡ’ ϩⲛ ⲟⲩⲟ̣[ⲩ]ⲥ̣ⲓⲁ <text:line-break/><text:span text:style-name="T1"> </text:span><text:span text:style-name="T2">(116/9) </text:span> ⲙⲛ ⲛⲏ ⲙⲉⲛ ⲙ ⲡⲣⲏⲧⲉ ⲛ̣ [ⲟⲩⲟⲩⲥ]ⲓ̣ⲁ <text:line-break/><text:span text:style-name="T1"> </text:span><text:span text:style-name="T2">(116/10) </text:span> ϩⲛ ⲟⲩⲡⲣⲁⲝⲓⲥ ⲏ%0 ⲟⲩϫⲓ ⲙⲕ[ⲁϩ ⲉ]ⲩ̣‐ <text:line-break/><text:span text:style-name="T1"> </text:span><text:span text:style-name="T2">(116/11) </text:span> ϣⲟⲟⲡ’ ϩⲛ ⲟⲩⲙⲉϩⲥⲛⲁⲩ· ⲉ[ⲥϣⲟ]‐ <text:line-break/><text:span text:style-name="T1"> </text:span><text:span text:style-name="T2">(116/12) </text:span> ⲟⲡ’ ⲅⲁⲣ ⲛϩⲏⲧⲟⲩ ⲛϭⲓ ϯⲙⲛⲧ[ⲁⲧⲙⲓ]‐ <text:line-break/><text:span text:style-name="T1"> </text:span><text:span text:style-name="T2">(116/13) </text:span> ⲥⲉ ⲛⲧⲉ ⲛⲓⲙⲛⲧ’ⲁⲧ’ⲙⲓⲥⲉ̣ [ⲉⲧϣⲟ]‐ <text:line-break/><text:span text:style-name="T1"> </text:span><text:span text:style-name="T2">(116/14) </text:span> ⲟⲡ’ ⲟⲛⲧⲱⲥ· ⲁⲩⲱ ⲛⲓⲁ[ⲧⲙⲓⲥⲉ] <text:line-break/><text:span text:style-name="T1"> </text:span><text:span text:style-name="T2">(116/15) </text:span> ⲉⲧⲁⲩϣⲱⲡⲉ ⲉⲥⲁϩⲉⲣⲁ[ⲧⲥ ⲛ]‐ <text:line-break/><text:span text:style-name="T1"> </text:span><text:span text:style-name="T2">(116/16) </text:span> ϭⲓ ⲧⲉⲩϭⲟ̣ⲙ· ⲉⲥⲙⲙⲁ̣ⲩ ⲛϭ̣[ⲓ ⲟⲩ]‐ <text:line-break/><text:span text:style-name="T1"> </text:span><text:span text:style-name="T2">(116/17) </text:span> ⲟⲩⲥⲓ[ⲁ ⲛ]ⲛ ⲁⲧ’ⲥⲱⲙⲁ ⲙⲛ̣ [ⲟⲩⲥⲱ] <text:line-break/><text:span text:style-name="T1"> </text:span><text:span text:style-name="T2">(116/18) </text:span> ⲙⲁ ⲉⲧⲉ ⲙⲁⲥⲧⲉⲕⲟ· ⲉϥⲙ[ⲡⲓⲙⲁ] <text:line-break/><text:span text:style-name="T1"> </text:span><text:span text:style-name="T2">(116/19) </text:span> ⲉⲧⲙⲙⲁⲩ ⲛϭⲓ ⲡⲓⲁⲧ’ⲟ̣[ⲩⲱⲧⲃ ⲉ]‐ <text:line-break/><text:span text:style-name="T1"> </text:span><text:span text:style-name="T2">(116/20) </text:span> ⲃⲟⲗ ⲉⲧ’ϣⲟⲟⲡ’ ⲟ[ⲛⲧⲱⲥ ⲁⲩⲱ] <text:line-break/><text:span text:style-name="T1"> </text:span><text:span text:style-name="T2">(116/21) </text:span> ⲡⲏ̣ ⲉϣ[ⲁ]ϥ̣ⲟⲩⲱⲧⲃ [ⲉⲃⲟⲗ ϩⲛ ⲟⲩ]‐ <text:line-break/><text:span text:style-name="T1"> </text:span><text:span text:style-name="T2">(116/22) </text:span> ϣ̣[ⲓ]ⲃⲉ ⲉϥⲁϩⲉⲣⲁⲧϥ ⲙ[ⲛ ⲛⲁⲓ̈] <text:line-break/><text:span text:style-name="T1"> </text:span><text:span text:style-name="T2">(116/23) </text:span> ⲣ̣[ⲟ]ⲩ ⲛ̣ϭⲓ [ⲡⲓ]ⲕⲱϩⲧ’ ⲛ[ <text:line-break/><text:span text:style-name="T1"> </text:span><text:span text:style-name="T2">(116/24) </text:span> [.......]ⲁ̣[ⲧ’]ⲧⲁⲕⲟ· ⲁ[ <text:line-break/><text:span text:style-name="T1"> </text:span><text:span text:style-name="T2">(116/25) </text:span> [.......]. ⲟⲩⲁ ⲛ̣[ <text:line-break/><text:span text:style-name="T1"> </text:span><text:span text:style-name="T2">(117/1) </text:span> ⲉϥⲁϩⲉⲣⲁⲧϥ· ⲉⲩⲙⲡⲙⲁ ⲉⲧⲙ‐ <text:line-break/><text:span text:style-name="T1"> </text:span><text:span text:style-name="T2">(117/2) </text:span> ⲙⲁⲩ ⲛϭⲓ ⲛⲓⲍⲱⲟⲛ ⲧⲏⲣⲟⲩ ⲉⲩ‐ <text:line-break/><text:span text:style-name="T1"> </text:span><text:span text:style-name="T2">(117/3) </text:span> ϣⲟⲟⲡ’ ⲛ ⲕⲁⲧⲁ ⲟⲩⲁ ⲉⲩϩⲟⲧⲡ’ <text:line-break/><text:span text:style-name="T1"> </text:span><text:span text:style-name="T2">(117/4) </text:span> [ϩ]ⲓ̣ ⲟ[ⲩ]ⲙⲁ ⲧⲏⲣⲟⲩ· ⲉⲥⲙⲙⲁⲩ ⲛ‐ <text:line-break/><text:span text:style-name="T1"> </text:span><text:span text:style-name="T2">(117/5) </text:span> ϭⲓ ϯⲅ̣ⲛ̣ⲱⲥⲓⲥ ⲛⲧⲉ ϯⲅⲛⲱⲥⲓⲥ <text:line-break/><text:span text:style-name="T1"> </text:span><text:span text:style-name="T2">(117/6) </text:span> ⲙⲛ ⲟⲩⲧⲁϩⲟ ⲛⲧⲉ ϯ[ⲙ]ⲛ̣ⲧ’ⲁⲧ’‐ <text:line-break/><text:span text:style-name="T1"> </text:span><text:span text:style-name="T2">(117/7) </text:span> ⲉⲓⲙⲉ· ⲉ̣ϥ̣ⲙⲙⲁⲩ ⲛϭⲓ̣ ⲟ̣ⲩⲭⲁⲟⲥ <text:line-break/><text:span text:style-name="T1"> </text:span><text:span text:style-name="T2">(117/8) </text:span> ⲙⲛ [ⲟⲩⲧⲟ]ⲡⲟⲥ ⲛⲧⲁⲩ ⲧⲏⲣⲟⲩ <text:line-break/><text:span text:style-name="T1"> </text:span><text:span text:style-name="T2">(117/9) </text:span> ⲉ̣ϥ̣[ϫⲏⲕ] ⲉⲃⲟⲗ ⲁⲩⲱ ⲉⲩⲉ ⲛ ⲃⲣⲣⲉ· <text:line-break/><text:span text:style-name="T1"> </text:span><text:span text:style-name="T2">(117/10) </text:span> [ⲟ]ⲩ̣〈ⲟⲩ〉ⲟ̣ⲉⲓⲛ ⲇⲉ ⲛ ⲧⲁⲡⲙⲉ ⲁⲩⲱ ⲟⲩ‐ <text:line-break/><text:span text:style-name="T1"> </text:span><text:span text:style-name="T2">(117/11) </text:span> [ⲕ]ⲁ̣ⲕⲉ ⲉⲁϥϫⲓ ⲟⲩⲟⲉⲓⲛ ⲙⲛ ⲡⲏ <text:line-break/><text:span text:style-name="T1"> </text:span><text:span text:style-name="T2">(117/12) </text:span> [ⲉ]ⲧⲉ ⲛϥϣⲟⲟⲡ’ ⲁⲛ ⲟⲛⲧⲱⲥ· <text:line-break/><text:span text:style-name="T1"> </text:span><text:span text:style-name="T2">(117/13) </text:span> [ⲡⲏ ⲛ]ⲉϥϣⲟⲟⲡ’ ⲁⲛ ⲟⲛⲧⲱⲥ· <text:line-break/><text:span text:style-name="T1"> </text:span><text:span text:style-name="T2">(117/14) </text:span> [.. ⲡ]ⲓⲁⲧ’ϣⲱⲡⲉ ⲉⲧⲉ ⲛϥϣⲟ‐ <text:line-break/><text:span text:style-name="T1"> </text:span><text:span text:style-name="T2">(117/15) </text:span> [ⲟⲡ’] ⲁⲛ ⲉ ⲡⲧⲏⲣϥ· ⲛⲧⲟϥ ⲇⲉ ⲡⲓ‐ <text:line-break/><text:span text:style-name="T1"> </text:span><text:span text:style-name="T2">(117/16) </text:span> [ⲁⲅⲁ]ⲑⲟⲛ ⲉⲧⲉ ⲉⲃⲟⲗ ⲙⲙⲟϥ ⲡⲉ <text:line-break/><text:span text:style-name="T1"> </text:span><text:span text:style-name="T2">(117/17) </text:span> [ⲡⲓ]ⲁ̣ⲅⲁⲑⲟⲛ ⲙⲛ ⲡⲏ [ⲉⲧ]ⲛⲁⲛⲟⲩϥ <text:line-break/><text:span text:style-name="T1"> </text:span><text:span text:style-name="T2">(117/18) </text:span> [ⲁⲩ]ⲱ̣ ⲡⲛⲟⲩⲧⲉ ⲉⲧⲉ ⲉⲃⲟⲗ ⲙ‐ <text:line-break/><text:span text:style-name="T1"> </text:span><text:span text:style-name="T2">(117/19) </text:span> [ⲙⲟϥ] ⲡ̣[ⲉ] ⲡⲛⲟⲩⲧⲉ ⲙⲛ ⲡⲏ ⲉⲧ’‐ <text:line-break/><text:span text:style-name="T1"> </text:span><text:span text:style-name="T2">(117/20) </text:span> [.........]ⲧⲉ· ⲡⲏ ⲉⲧⲛⲉⲁϥ· <text:line-break/><text:soft-page-break/><text:span text:style-name="T1"> </text:span><text:span text:style-name="T2">(117/21) </text:span> [.......]ⲩ ⲅⲁⲣ ϩⲛ ⲟⲩⲙⲉⲣⲟ̣ⲥ <text:line-break/><text:span text:style-name="T1"> </text:span><text:span text:style-name="T2">(117/22) </text:span> [......]ⲉⲓⲇⲟⲥ ⲙⲛ ⲡⲛⲟⲩ[ⲧ]ⲉ <text:line-break/><text:span text:style-name="T1"> </text:span><text:span text:style-name="T2">(117/23) </text:span> [......] ⲉⲧⲙⲙⲁⲩ ⲙⲛ ⲡⲏ [..] <text:line-break/><text:span text:style-name="T1"> </text:span><text:span text:style-name="T2">(117/24) </text:span> [.....ⲟ]ⲩⲛⲟⲩⲧⲉ [ <text:line-break/><text:span text:style-name="T1"> </text:span><text:span text:style-name="T2">(117/25) </text:span> [......]ⲉ ⲛⲁⲓ̈ ⲧⲏ̣[ⲣⲟⲩ] <text:line-break/><text:span text:style-name="T1"> </text:span><text:span text:style-name="T2">(117/26) </text:span> [......]ⲧ’̣ ⲕⲁⲕ[ⲉ <text:line-break/><text:span text:style-name="T1"> </text:span><text:span text:style-name="T2">(117/27) </text:span> [........]ϥ[ <text:line-break/><text:span text:style-name="T1"> </text:span><text:span text:style-name="T2">(118/1) </text:span> ⲁⲩⲱ ⲟⲩⲅⲉⲛⲟⲥ· ⲁⲩⲱ ⲉⲙⲡ̅ϥ̅‐ <text:line-break/><text:span text:style-name="T1"> </text:span><text:span text:style-name="T2">(118/2) </text:span> ⲧⲱϩ ⲙⲛ ⲗⲁⲁⲩ· ⲁⲗⲗⲁ ⲉϥϭⲉⲉⲧ’ <text:line-break/><text:span text:style-name="T1"> </text:span><text:span text:style-name="T2">(118/3) </text:span> ⲙⲁⲩⲁⲁϥ ⲛϩⲣⲁⲓ̈ ⲛϩⲏⲧϥ ⲁⲩⲱ <text:line-break/><text:span text:style-name="T1"> </text:span><text:span text:style-name="T2">(118/4) </text:span> ⲉϥⲙⲟⲧⲛ ⲙⲙⲟϥ ⲛϩⲣⲁⲓ̈ ϩⲙ̣ ⲡ̣ⲓ̣[ⲁ]‐ <text:line-break/><text:span text:style-name="T1"> </text:span><text:span text:style-name="T2">(118/5) </text:span> ⲣⲏϫϥ ⲛⲧⲁϥ ⲛⲛ ⲁⲧⲛ ⲁⲣⲏϫ̣ϥ· ⲡⲁⲓ̈ <text:line-break/><text:span text:style-name="T1"> </text:span><text:span text:style-name="T2">(118/6) </text:span> ⲇⲉ ⲡⲉ [ⲡ]ⲛ̣ⲟⲩⲧⲉ ⲛⲧⲉ ⲛⲏ ⲉⲧϣⲟ̣‐ <text:line-break/><text:span text:style-name="T1"> </text:span><text:span text:style-name="T2">(118/7) </text:span> ⲟⲡ’ ⲟⲛⲧⲱⲥ· ⲟⲩⲣ̣[ⲉϥ]ⲛ[ⲁⲩ] ⲉⲣⲟϥ <text:line-break/><text:span text:style-name="T1"> </text:span><text:span text:style-name="T2">(118/8) </text:span> ⲙⲛ ⲟⲩⲣⲉϥⲟⲩⲉⲛϩ ⲛⲟ[ⲩⲧⲉ ⲉⲃ]ⲟⲗ· <text:line-break/><text:span text:style-name="T1"> </text:span><text:span text:style-name="T2">(118/9) </text:span> ⲉⲁⲥϯ ϭⲟⲙ ⲙ ⲡⲏ ⲉⲧ’ⲥⲟ̣[ⲩⲱⲛⲥ] <text:line-break/><text:span text:style-name="T1"> </text:span><text:span text:style-name="T2">(118/10) </text:span> ⲛϭⲓ ϯⲃⲁⲣⲃⲏⲗⲱ ⲡⲓⲁⲓⲱⲛ ϯ[ⲅⲛⲱ]‐ <text:line-break/><text:span text:style-name="T1"> </text:span><text:span text:style-name="T2">(118/11) </text:span> ⲥⲓⲥ ⲛⲧⲉ ⲡⲓⲁϩⲟⲣⲁⲧⲟⲛ ⲛ ϣⲙ[ⲧ’]‐ <text:line-break/><text:span text:style-name="T1"> </text:span><text:span text:style-name="T2">(118/12) </text:span> ϭⲟⲙ ⲛ ⲧⲉⲗⲓⲟⲥ ⲙ ⲡ̅ⲛ̅ⲁ̅ ⲁϯ[ <text:line-break/><text:span text:style-name="T1"> </text:span><text:span text:style-name="T2">(118/13) </text:span> ⲛⲁⲥ ⲉⲥϫⲱ ⲙⲙⲟⲥ ϫⲉ ϥ[ <text:line-break/><text:span text:style-name="T1"> </text:span><text:span text:style-name="T2">(118/14) </text:span> ⲟⲩⲱⲛϩ ϯⲟⲛϩ ⲛϩⲣⲁⲓ̈ ϩⲛ ⲟ̣[ <text:line-break/><text:span text:style-name="T1"> </text:span><text:span text:style-name="T2">(118/15) </text:span> ⲕⲟⲛϩ ⲡⲓⲟⲩⲁ· ϥⲟⲛϩ ⲛϭ[ⲓ ⲡⲏ] <text:line-break/><text:span text:style-name="T1"> </text:span><text:span text:style-name="T2">(118/16) </text:span> ⲉⲧⲉ ⲛ [ϣ]ⲟ̣ⲙⲧ’ ⲛⲧⲟⲕ ⲡⲉ [ⲡϣⲟ]‐ <text:line-break/><text:span text:style-name="T1"> </text:span><text:span text:style-name="T2">(118/17) </text:span> ⲙⲧ’ ⲉⲧⲉ ⲛ ϣⲟⲙⲧ’ ⲛ ⲕⲱ̣[ⲃ...] <text:line-break/><text:span text:style-name="T1"> </text:span><text:span text:style-name="T2">(118/18) </text:span> ⲉⲉⲉ· ⲡⲓϣⲟⲣⲡ’ ⲛ ⲍ̅ ⲛ̣ [ <text:line-break/><text:span text:style-name="T1"> </text:span><text:span text:style-name="T2">(118/19) </text:span> ϯⲙⲉϩϣⲟⲙⲧⲉ̣ [ <text:line-break/><text:span text:style-name="T1"> </text:span><text:span text:style-name="T2">(118/20) </text:span> ⲡⲓⲙⲉϩⲥⲛⲁⲩ ⲛ ⲥ.[ <text:line-break/><text:span text:style-name="T1"> </text:span><text:span text:style-name="T2">(118/21) </text:span> ⲉ̣ⲉⲉⲉ ⲁⲁⲁⲁⲁⲁⲁ[ <text:line-break/><text:span text:style-name="T1"> </text:span><text:span text:style-name="T2">(118/22) </text:span> [.] ⲥ̣ⲛⲧⲉ ⲡⲁⲓ̈ ⲇⲉ ϥⲧ[ⲟⲟⲩ <text:line-break/><text:span text:style-name="T1"> </text:span><text:span text:style-name="T2">(118/23) </text:span> [....].. ϯⲅⲛⲱ̣[ⲥⲓⲥ <text:line-break/><text:span text:style-name="T1"> </text:span><text:span text:style-name="T2">(118/24) </text:span> [........]ⲧ̣ϥ· ⲧⲏ[ <text:line-break/><text:span text:style-name="T1"> </text:span><text:span text:style-name="T2">(118/25) </text:span> [ ]ⲉⲓ̣[ <text:line-break/><text:span text:style-name="T1"> </text:span><text:span text:style-name="T2">(119/1) </text:span> ⲟⲩⲙⲉⲣⲟⲥ· ⲁϣ ⲛ ⲛⲟⲩⲥ ⲁⲩⲱ <text:line-break/><text:span text:style-name="T1"> </text:span><text:span text:style-name="T2">(119/2) </text:span> ⲁϣ ⲛ ⲥⲟⲫⲓⲁ· ⲁⲩⲱ ⲁϣ ⲛⲛ ⲉⲡⲓⲥ‐ <text:line-break/><text:span text:style-name="T1"> </text:span><text:span text:style-name="T2">(119/3) </text:span> ⲧⲏⲙⲏ ⲏ%0 ⲁϣ ⲛ ⲥⲃⲱ· ϣⲁⲩϯ ⲣⲁⲛ <text:line-break/><text:span text:style-name="T1"> </text:span><text:span text:style-name="T2">(119/4) </text:span> [ⲇ]ⲉ ⲉ̣ [ⲛ]ⲉϥⲫⲱⲥⲧⲏⲣ ⲡⲓϣⲟⲣⲡ’ ⲙⲉⲛ <text:line-break/><text:span text:style-name="T1"> </text:span><text:span text:style-name="T2">(119/5) </text:span> [ⲡⲉ ⲁ̅ⲣ̅ⲙ̅ⲏ̅]̅ⲇ̅ⲱ̅ⲛ̅ ⲙⲛ ⲧⲏ ⲉⲧⲛⲙⲙⲁϥ <text:line-break/><text:span text:style-name="T1"> </text:span><text:span text:style-name="T2">(119/6) </text:span> ..[... ⲡ]ⲓⲙⲉϩⲥⲛⲁⲩ ⲡⲉ ⲇⲓⲫⲁ‐ <text:line-break/><text:span text:style-name="T1"> </text:span><text:span text:style-name="T2">(119/7) </text:span> ⲛⲉ̣[.. ⲙⲛ ⲧ]ⲏ ⲉⲧⲛⲙ[ⲙ]ⲁϥ ⲇ̅ⲏ̅ⲓ̅ <text:line-break/><text:span text:style-name="T1"> </text:span><text:span text:style-name="T2">(119/8) </text:span> ⲫ̅[ .. ⲡ]ⲓⲙⲉϩϣⲟⲙⲧ’ ⲡⲉ <text:line-break/><text:span text:style-name="T1"> </text:span><text:span text:style-name="T2">(119/9) </text:span> [ⲙⲁⲗⲥⲏⲇ]ⲱⲛ ⲙⲛ ⲧⲏ ⲉⲧⲛⲙⲙⲁϥ <text:line-break/><text:span text:style-name="T1"> </text:span><text:span text:style-name="T2">(119/10) </text:span> [.....] ⲡⲓⲙⲉϩϥⲧⲟⲟⲩ ⲡⲉ <text:line-break/><text:span text:style-name="T1"> </text:span><text:span text:style-name="T2">(119/11) </text:span> [....]ⲥ ⲙⲛ ⲧⲏ ⲉⲧⲛⲙⲙⲁϥ ⲟ̅ⲗ̅ⲙ̅ⲓ̅ⲥ̅ <text:line-break/><text:span text:style-name="T1"> </text:span><text:span text:style-name="T2">(119/12) </text:span> [ⲁⲩⲱ] ϥ̣ϣⲟⲟⲡ’ ⲛϭⲓ ⲡⲓⲕ̅ⲗ̅ⲥ̅ ⲉⲁϥ‐ <text:line-break/><text:span text:style-name="T1"> </text:span><text:span text:style-name="T2">(119/13) </text:span> [....]. ⲙⲛ ⲧⲉϥⲉ̅ⲓ̅ⲇ̅ⲉ̅ⲁ̅· ⲁⲩⲱ <text:line-break/><text:span text:style-name="T1"> </text:span><text:span text:style-name="T2">(119/14) </text:span> [ϥϣⲟⲟ]ⲡ’ ⲛⲛ ⲁⲧⲟⲩⲱⲛϩ ⲛ ⲛⲁⲓ̈ <text:line-break/><text:span text:style-name="T1"> </text:span><text:span text:style-name="T2">(119/15) </text:span> [ⲧⲏⲣ]ⲟⲩ ϩⲓⲛⲁ ϫⲉ ⲉⲩⲉϫⲓ ϭⲟⲙ <text:line-break/><text:soft-page-break/><text:span text:style-name="T1"> </text:span><text:span text:style-name="T2">(119/16) </text:span> [ⲉⲃⲟ]ⲗ ϩⲓ̣[ⲧ]ⲟ̣ⲟⲧϥ ⲧⲏⲣⲟⲩ ⲉⲩ‐ <text:line-break/><text:span text:style-name="T1"> </text:span><text:span text:style-name="T2">(119/17) </text:span> [..]ⲥ̣ⲧⲉ̣ ⲉ̣ϥϣⲟⲟⲡ’ [ⲛ]ϩⲣⲁⲓ̈ ϩⲙ <text:line-break/><text:span text:style-name="T1"> </text:span><text:span text:style-name="T2">(119/18) </text:span> [...]ⲱ. ⲙ ⲡⲁⲛⲧⲉⲗⲓⲟⲥ ⲉⲩⲛ‐ <text:line-break/><text:span text:style-name="T1"> </text:span><text:span text:style-name="T2">(119/19) </text:span> [ⲧⲁϥ ⲙ ⲡⲓ]ϥⲧⲟⲟⲩ ⲉⲩϣⲟⲟⲡ’ <text:line-break/><text:span text:style-name="T1"> </text:span><text:span text:style-name="T2">(119/20) </text:span> [..... ⲁ]ⲩⲱ ⲡⲓϣⲟⲣⲡ’ ⲛⲓ‐ <text:line-break/><text:span text:style-name="T1"> </text:span><text:span text:style-name="T2">(119/21) </text:span> [..... ⲟ]ⲩⲇⲉ ⲕⲁⲧⲁ ⲟⲩϩⲱ‐ <text:line-break/><text:span text:style-name="T1"> </text:span><text:span text:style-name="T2">(119/22) </text:span> [.....]ⲏϩ ⲉⲣⲟϥ ⲙⲁ̣ⲩⲁⲁ[ϥ] <text:line-break/><text:span text:style-name="T1"> </text:span><text:span text:style-name="T2">(119/23) </text:span> [.... ⲃ̅]̅ⲁ̣̅̅ⲣ̅ⲃ̅ⲏ̅ⲗ̅ⲱ̣̅̅ [....]ⲏ ⲇ̣[..]. <text:line-break/><text:span text:style-name="T1"> </text:span><text:span text:style-name="T2">(119/24) </text:span> [......]ⲡⲧ̣[......... <text:line-break/><text:span text:style-name="T1"> </text:span><text:span text:style-name="T2">(119/25) </text:span> [......]ⲫⲱ̣[........ <text:line-break/><text:span text:style-name="T1"> </text:span><text:span text:style-name="T2">(120/1) </text:span> ⲉⲓⲙⲉ ⲉⲣⲟϥ ⲙⲛ ⲡⲏ ⲉⲧ’ⲕⲏ ⲉ‐ <text:line-break/><text:span text:style-name="T1"> </text:span><text:span text:style-name="T2">(120/2) </text:span> ϩⲣⲁⲓ̈ ⲉⲩⲙⲉϩⲥⲛⲁⲩ· ⲡⲓϣⲟⲣⲡ’ <text:line-break/><text:span text:style-name="T1"> </text:span><text:span text:style-name="T2">(120/3) </text:span> ⲇⲉ ⲛⲧⲉ ⲛⲓⲉⲱⲛ ⲡⲉ ϩⲁⲣⲙⲏⲇⲱⲛ <text:line-break/><text:span text:style-name="T1"> </text:span><text:span text:style-name="T2">(120/4) </text:span> ⲡⲓⲉⲟⲟⲩ ⲛ ⲉⲓⲱⲧ’ ⲡⲓⲙⲉ̣[ϩ]ⲥ̣ⲛⲁ̣ⲩ̣ <text:line-break/><text:span text:style-name="T1"> </text:span><text:span text:style-name="T2">(120/5) </text:span> ⲇⲉ ⲙ ⲫⲱⲥⲧⲏⲣ ⲡⲏ ⲉⲧ̣[ⲉ ⲛϥⲉⲓⲙⲉ] <text:line-break/><text:span text:style-name="T1"> </text:span><text:span text:style-name="T2">(120/6) </text:span> ⲉⲣⲟϥ ⲁⲛ· ⲁⲗⲗⲁ ⲛⲓⲕⲁ̣ⲧ̣[ⲁ ⲟⲩⲁ ⲧⲏ]‐ <text:line-break/><text:span text:style-name="T1"> </text:span><text:span text:style-name="T2">(120/7) </text:span> ⲣⲟⲩ ⲟⲩⲥⲟⲫⲓⲁ ⲛ [......]ϣⲟ‐ <text:line-break/><text:span text:style-name="T1"> </text:span><text:span text:style-name="T2">(120/8) </text:span> ⲟⲡ’ ϩⲙ ⲡⲓⲙⲉϩϥⲧⲟ[ⲟⲩ ⲛⲛ ⲉⲱ]ⲛ· <text:line-break/><text:span text:style-name="T1"> </text:span><text:span text:style-name="T2">(120/9) </text:span> ⲡⲏ ⲉⲧⲁϥⲟⲩⲱⲛϩ ⲉⲃ[ⲟⲗ ⲙⲙⲟϥ] <text:line-break/><text:span text:style-name="T1"> </text:span><text:span text:style-name="T2">(120/10) </text:span> ⲙⲛ ⲛⲓⲉⲟⲟⲩ ⲧⲏⲣⲟⲩ [ⲡⲓⲙⲉϩϣⲟ]‐ <text:line-break/><text:span text:style-name="T1"> </text:span><text:span text:style-name="T2">(120/11) </text:span> ⲙⲧ’ ⲇⲉ ⲙ ⲫⲱⲥⲧⲏⲣ ⲡⲏ̣ ⲉ̣[....] <text:line-break/><text:span text:style-name="T1"> </text:span><text:span text:style-name="T2">(120/12) </text:span> ⲉⲣⲟϥ ⲁⲛ· ⲉⲡⲓϣⲁϫⲉ ⲛⲧ[ⲉ ⲛⲓⲉⲓ]‐ <text:line-break/><text:span text:style-name="T1"> </text:span><text:span text:style-name="T2">(120/13) </text:span> ⲇⲟⲥ ⲧⲏⲣⲟⲩ ⲙⲛ ⲡⲓⲕⲉⲉ̣[ⲟⲟⲩ] <text:line-break/><text:span text:style-name="T1"> </text:span><text:span text:style-name="T2">(120/14) </text:span> ⲉⲧⲙⲙⲁⲩ ϯⲉⲡⲓⲥⲧⲏⲙ[ⲏ ⲧⲏ ⲉⲧ]‐ <text:line-break/><text:span text:style-name="T1"> </text:span><text:span text:style-name="T2">(120/15) </text:span> ⲛϩⲣⲁⲓ̈ ϩⲙ ⲡⲓⲙⲉϩϣⲟⲙⲧ’ ⲛ̣[ⲛ ⲉⲱⲛ] <text:line-break/><text:span text:style-name="T1"> </text:span><text:span text:style-name="T2">(120/16) </text:span> ⲟⲩⲛ ϥⲧⲟⲟⲩ ϣⲟⲟⲡ’ ⲛ̣ϩⲣ[ⲁⲓ̈ ⲛ]‐ <text:line-break/><text:span text:style-name="T1"> </text:span><text:span text:style-name="T2">(120/17) </text:span> ϩⲏⲧϥ· ⲙ̅ⲁ̅ⲗ̅ⲥ̅ⲏ̅ⲇ̅ⲱ̅ⲛ̣̅̅[·] ⲙⲛ ⲙ[.. <text:line-break/><text:span text:style-name="T1"> </text:span><text:span text:style-name="T2">(120/18) </text:span> ⲛⲓⲟⲥ· ⲡ̣[ⲓ]ⲙⲉϩϥⲧⲟ̣ⲟ̣ⲩ ⲇ[ⲉ ⲙ ⲫⲱ]‐ <text:line-break/><text:span text:style-name="T1"> </text:span><text:span text:style-name="T2">(120/19) </text:span> ⲥⲧⲏⲣ ⲡⲉ ⲡⲏ ⲉⲧⲛⲁⲩ̣ [ⲉ]ⲣ̣[ⲟ <text:line-break/><text:span text:style-name="T1"> </text:span><text:span text:style-name="T2">(120/20) </text:span> ⲛⲧⲉ ⲛⲓⲉⲓⲇⲟⲥ ⲧⲏ̣ⲣ̣ⲟ̣[ⲩ.... <text:line-break/><text:span text:style-name="T1"> </text:span><text:span text:style-name="T2">(120/21) </text:span> ϩⲓ ⲟⲩⲙⲁ ⲉⲩϣⲟ̣[ⲟⲡ’ <text:line-break/><text:span text:style-name="T1"> </text:span><text:span text:style-name="T2">(120/22) </text:span> ⲟⲩⲥⲃⲱ ⲙⲛ ⲟⲩⲉⲟⲟ̣[ⲩ.... <text:line-break/><text:span text:style-name="T1"> </text:span><text:span text:style-name="T2">(120/23) </text:span> ⲙⲛ̣ ⲧⲙⲉ ⲛⲧⲉ ⲡⲓϥⲧ[ⲟⲟⲩ ⲛⲛ ⲉⲱⲛ] <text:line-break/><text:span text:style-name="T1"> </text:span><text:span text:style-name="T2">(120/24) </text:span> ⲟ̣̅[ⲗ̅]ⲙ̅ⲓ̅ⲥ̣̅ [...] ⲙ̣ⲛ ⲡⲓⲁ[..... <text:line-break/><text:span text:style-name="T1"> </text:span><text:span text:style-name="T2">(120/25) </text:span> [ ] ϩⲓ [...... <text:line-break/><text:span text:style-name="T1"> </text:span><text:span text:style-name="T2">(120/26) </text:span> [ ]ⲟⲱ̣[...... <text:line-break/><text:span text:style-name="T1"> </text:span><text:span text:style-name="T2">(121/1) </text:span> ⲙⲉϩϯⲟⲩ· ⲁⲩⲱ ⲡⲓϣⲟⲣⲡ’ ⲉ‐ <text:line-break/><text:span text:style-name="T1"> </text:span><text:span text:style-name="T2">(121/2) </text:span> ⲧⲉ ⲡⲓⲙⲉϩⲥⲛⲁⲩ ⲡⲉ ⲉⲧⲉ ⲡⲁⲓ̈ <text:line-break/><text:span text:style-name="T1"> </text:span><text:span text:style-name="T2">(121/3) </text:span> ⲡⲉ ⲛⲧⲟϥ ⲡⲉ ⲡⲓⲕ̅ⲗ̅ⲥ̅ ⲙ ⲡⲁⲛⲧⲉⲗⲓⲟⲥ <text:line-break/><text:span text:style-name="T1"> </text:span><text:span text:style-name="T2">(121/4) </text:span> ⲥⲉϣⲟ̣ⲟⲡ’ ⲅⲁⲣ ⲛϭⲓ ⲡⲓϥⲧⲟⲟⲩ ⲙ <text:line-break/><text:span text:style-name="T1"> </text:span><text:span text:style-name="T2">(121/5) </text:span> ⲫⲱⲥⲧ[ⲏ]ⲣ· ⲡⲓⲕⲗ̅ⲥ̅ ⲇⲉ ⲉⲧⲁϥⲡⲱϣ <text:line-break/><text:span text:style-name="T1"> </text:span><text:span text:style-name="T2">(121/6) </text:span> ⲟⲛ· ⲁⲩⲱ̣ ⲛⲁ̣ⲓ̈ ⲉⲩϣⲟⲟⲡ’ ϩⲓ ⲟⲩ‐ <text:line-break/><text:span text:style-name="T1"> </text:span><text:span text:style-name="T2">(121/7) </text:span> ⲙⲁ· ⲁⲩⲱ̣ [ⲛ]ⲁ̣ⲓ̈ ⲉⲧ’ⲥⲟⲟⲩⲛ ⲛⲉⲧ’‐ <text:line-break/><text:span text:style-name="T1"> </text:span><text:span text:style-name="T2">(121/8) </text:span> ϣⲟⲟⲡ’ ⲛ [ⲉ]ⲟⲟⲩ ⲧⲏⲣⲟⲩ· ⲛⲧⲟ‐ <text:line-break/><text:span text:style-name="T1"> </text:span><text:span text:style-name="T2">(121/9) </text:span> ⲟ̣[ⲩ ⲧⲏⲣⲟ]ⲩ ⲉⲩⲉ ⲛ ⲧⲉⲗⲓⲟⲥ· ⲡⲁⲓ̈ <text:line-break/><text:span text:style-name="T1"> </text:span><text:span text:style-name="T2">(121/10) </text:span> [....]ⲥ̣ⲟ̣ⲟⲩⲛ ⲛ ϩⲱⲃ ⲛⲓⲙ ⲛ‐ <text:line-break/><text:span text:style-name="T1"> </text:span><text:span text:style-name="T2">(121/11) </text:span> ⲧⲁⲩ ⲧⲏⲣⲟⲩ ⲉⲩⲡⲁⲛⲧⲉⲗⲓⲟⲥ <text:line-break/><text:soft-page-break/><text:span text:style-name="T1"> </text:span><text:span text:style-name="T2">(121/12) </text:span> ⲡⲉ· ⲉⲧⲉ ⲉⲃⲟⲗ ⲙⲙⲟϥ ⲡⲉ ϭⲟⲙ <text:line-break/><text:span text:style-name="T1"> </text:span><text:span text:style-name="T2">(121/13) </text:span> [ⲛ]ⲓⲙ· ⲁⲩⲱ ⲟⲩⲟⲛ ⲛⲓⲙ ⲙⲛ ⲡⲓ‐ <text:line-break/><text:span text:style-name="T1"> </text:span><text:span text:style-name="T2">(121/14) </text:span> ⲉⲱⲛ̣ ⲧⲏⲣϥ ⲛⲧⲁⲩ· ⲡⲏ ⲉϣⲁⲩ‐ <text:line-break/><text:span text:style-name="T1"> </text:span><text:span text:style-name="T2">(121/15) </text:span> [ⲉ]ⲓ̣ ⲉϩⲣⲁⲓ̈ ⲉⲣⲟϥ ⲧⲏⲣⲟⲩ· ⲁⲩⲱ <text:line-break/><text:span text:style-name="T1"> </text:span><text:span text:style-name="T2">(121/16) </text:span> ϣⲁⲩⲉⲓ ⲉⲃⲟⲗ ⲙⲙⲟϥ ⲛϭⲓ ⲛⲁⲓ̈ <text:line-break/><text:span text:style-name="T1"> </text:span><text:span text:style-name="T2">(121/17) </text:span> [ⲧⲏⲣ]ⲟⲩ· ϯϭⲟⲙ ⲛⲧⲉ̣ ⲛⲁⲓ̈ ⲧⲏ‐ <text:line-break/><text:span text:style-name="T1"> </text:span><text:span text:style-name="T2">(121/18) </text:span> [ⲣⲟ]ⲩ̣· ⲧⲁⲣⲭⲏ ⲛⲧⲉ ⲛⲁⲓ̈ ⲧⲏ‐ <text:line-break/><text:span text:style-name="T1"> </text:span><text:span text:style-name="T2">(121/19) </text:span> [ⲣⲟⲩ· ⲉ]ϣⲱⲡⲉ ⲉϥϣⲁⲛⲉⲓⲙⲉ <text:line-break/><text:span text:style-name="T1"> </text:span><text:span text:style-name="T2">(121/20) </text:span> [ⲙⲙⲟⲟⲩ] ⲁϥϣⲱⲡⲉ ⲛ ⲟⲩⲙⲉϩ‐ <text:line-break/><text:span text:style-name="T1"> </text:span><text:span text:style-name="T2">(121/21) </text:span> [.......]ⲉⲱⲛ· ⲙⲛ ⲟⲩⲙⲉϩ‐ <text:line-break/><text:span text:style-name="T1"> </text:span><text:span text:style-name="T2">(121/22) </text:span> [......]ⲙⲛⲧ’ⲁⲧ’ⲙⲓⲥⲉ· ⲉⲩ‐ <text:line-break/><text:span text:style-name="T1"> </text:span><text:span text:style-name="T2">(121/23) </text:span> [.....] ϩⲉⲛⲕⲉⲉⲱⲛ ϩⲣⲁ[ⲓ̈] <text:line-break/><text:span text:style-name="T1"> </text:span><text:span text:style-name="T2">(121/24) </text:span> [ϩⲛ...]ⲟⲩ.[......... <text:line-break/><text:span text:style-name="T1"> </text:span><text:span text:style-name="T2">(121/25) </text:span> [......]ⲟ[ <text:line-break/><text:span text:style-name="T1"> </text:span><text:span text:style-name="T2">(121/26) </text:span> [.....].ⲁ.[......... <text:line-break/><text:span text:style-name="T1"> </text:span><text:span text:style-name="T2">(122/1) </text:span> ϣⲱⲡⲉ ⲛⲛ ⲟⲩⲃ̅ⲁ̅ⲣ̅ⲃ̅ⲏ̅ⲗ̅ⲱ̅ ϣⲁϥ‐ <text:line-break/><text:span text:style-name="T1"> </text:span><text:span text:style-name="T2">(122/2) </text:span> ϣⲱⲡⲉ ⲛⲛ ⲟⲩϣⲟⲣⲡ’ ⲛⲛ ⲉⲱⲛ <text:line-break/><text:span text:style-name="T1"> </text:span><text:span text:style-name="T2">(122/3) </text:span> ⲉⲧⲃⲉ ϯⲙⲛⲧ’ϣⲁ ⲉⲛⲉϩ ⲛⲧⲉ ⲡⲓ‐ <text:line-break/><text:span text:style-name="T1"> </text:span><text:span text:style-name="T2">(122/4) </text:span> ⲁϩⲟⲣⲁⲧⲟⲛ ⲙ ⲡ̅ⲛ̅ⲁ̅· ϯⲙⲉϩⲥⲛⲧⲉ <text:line-break/><text:span text:style-name="T1"> </text:span><text:span text:style-name="T2">(122/5) </text:span> ⲙ ⲙⲛⲧ’ⲁⲧ’ⲙⲓⲥⲉ· ⲛⲓ̣[ⲉ]ⲟⲟⲩ ⲇⲉ <text:line-break/><text:span text:style-name="T1"> </text:span><text:span text:style-name="T2">(122/6) </text:span> ⲧⲏⲣⲟⲩ ⲛⲁⲓ̈ ⲛⲉ ⲛ̅ⲓ̅ⲁ̅ⲫ̅ⲣ̅ⲏ̅ⲇ̅ⲱ̅ⲛ̅ <text:line-break/><text:span text:style-name="T1"> </text:span><text:span text:style-name="T2">(122/7) </text:span> ⲛⲛ ⲁⲧⲛ ⲁⲣⲏϫⲛⲟⲩ̣ [. ⲛ]ⲓⲁⲧ’ϣⲁ‐ <text:line-break/><text:span text:style-name="T1"> </text:span><text:span text:style-name="T2">(122/8) </text:span> ϫⲉ ⲙⲙⲟⲟⲩ ⲛⲓⲣⲉϥⲟ[ⲩ]ⲱⲛϩ ⲉⲃⲟⲗ· <text:line-break/><text:span text:style-name="T1"> </text:span><text:span text:style-name="T2">(122/9) </text:span> ⲛⲓⲁⲧⲟⲩⲱⲧⲃ ⲉⲃⲟⲗ ⲛ[ⲓ......] <text:line-break/><text:span text:style-name="T1"> </text:span><text:span text:style-name="T2">(122/10) </text:span> ⲧⲏⲣⲟⲩ· ⲛⲓⲣⲉϥⲟⲩⲉⲛϩ ⲉⲟⲟⲩ ⲉⲃⲟⲗ <text:line-break/><text:span text:style-name="T1"> </text:span><text:span text:style-name="T2">(122/11) </text:span> ⲛ̅ⲓ̅ⲙ̅ⲁ̅ⲣ̅ⲝ̅ⲏ̅ⲇ̅ⲱ̅ⲛ̅· ⲛⲏ ⲉⲧⲟⲩⲟⲛϩ ⲉ‐ <text:line-break/><text:span text:style-name="T1"> </text:span><text:span text:style-name="T2">(122/12) </text:span> ⲃⲟⲗ ⲉⲩⲕⲏⲃ· ⲛ̅ⲓ̅ⲥ̅ⲟ̅ⲗ̅ⲙ̅ⲓ̅ⲥ̅ ⲛⲓⲁⲧ[ⲛ] <text:line-break/><text:span text:style-name="T1"> </text:span><text:span text:style-name="T2">(122/13) </text:span> ⲁⲣⲏϫⲛⲟⲩ· ⲛⲓⲟⲩⲱⲛϩ ⲉ̣ⲃⲟⲗ ⲙ‐ <text:line-break/><text:span text:style-name="T1"> </text:span><text:span text:style-name="T2">(122/14) </text:span> ⲙⲟⲟⲩ ⲙⲁⲩⲁⲁⲩ· ⲛⲏ ⲉⲧ’ⲙⲉ[ϩ] <text:line-break/><text:span text:style-name="T1"> </text:span><text:span text:style-name="T2">(122/15) </text:span> ⲉⲃⲟⲗ ⲛⲛ ⲉⲟⲟⲩ· ⲛⲏ ⲉⲧⲟϩ[ⲉ ⲉ] <text:line-break/><text:span text:style-name="T1"> </text:span><text:span text:style-name="T2">(122/16) </text:span> ⲉⲟⲟⲩ[· ⲛ]ⲓⲣⲉϥⲥⲙⲟⲩ ⲛⲓⲙ[ⲁⲣⲥⲏ]‐ <text:line-break/><text:span text:style-name="T1"> </text:span><text:span text:style-name="T2">(122/17) </text:span> ⲇⲱⲛ· ⲛⲓⲕ̅ⲗ̅ⲥ̅ ⲛⲏ ⲉⲧ̣[..... <text:line-break/><text:span text:style-name="T1"> </text:span><text:span text:style-name="T2">(122/18) </text:span> ⲉⲃⲟⲗ· ⲛⲓⲁⲣⲏϫⲛⲟⲩ ⲛ[ⲏⲉⲧⲕⲏ] <text:line-break/><text:span text:style-name="T1"> </text:span><text:span text:style-name="T2">(122/19) </text:span> ϩⲓϫⲛ ⲛⲓⲁⲣⲏϫⲛⲟⲩ [........ <text:line-break/><text:span text:style-name="T1"> </text:span><text:span text:style-name="T2">(122/20) </text:span> ⲉⲩⲉ ⲛⲏ ⲉⲧ’ϣⲟⲟⲡ’ ϩ[ⲛ.... <text:line-break/><text:span text:style-name="T1"> </text:span><text:span text:style-name="T2">(122/21) </text:span> ⲉ̣ⲩⲉ· .....ⲧⲁϩ.[..... <text:line-break/><text:span text:style-name="T1"> </text:span><text:span text:style-name="T2">(122/22) </text:span> [ ].[...... <text:line-break/><text:span text:style-name="T1"> </text:span><text:span text:style-name="T2">(122/23) </text:span> [ ]ⲙ.[...... <text:line-break/><text:span text:style-name="T1"> </text:span><text:span text:style-name="T2">(122/24) </text:span> (Missing 1 - 2 lines.) <text:line-break/><text:span text:style-name="T1"> </text:span><text:span text:style-name="T2">(123/1) </text:span> ⲙⲙⲁⲩ ⲛ ϩⲉⲛⲁⲛⲧⲃⲁ ⲛⲛ ⲉⲟⲟⲩ <text:line-break/><text:span text:style-name="T1"> </text:span><text:span text:style-name="T2">(123/2) </text:span> ⲛϩⲣⲁⲓ̈ ⲛϩⲏⲧⲟⲩ· ⲉⲧⲃⲉ ⲡⲁⲓ̈ ⲟⲩ‐ <text:line-break/><text:span text:style-name="T1"> </text:span><text:span text:style-name="T2">(123/3) </text:span> ⲉⲟⲟⲩ ⲉϥϫⲏⲕ ⲡⲉ ϩⲓⲛⲁ ⲉϣⲱⲡⲉ <text:line-break/><text:span text:style-name="T1"> </text:span><text:span text:style-name="T2">(123/4) </text:span> ⲉϥϣⲁⲛϭⲙϭⲟⲙ ⲉ ⲛⲟⲩϩⲃ ⲁⲩⲱ <text:line-break/><text:span text:style-name="T1"> </text:span><text:span text:style-name="T2">(123/5) </text:span> ⲛϥⲁⲙⲁϩⲧⲉ ⲛϥϣⲱⲡⲉ ⲛ ⲧⲉⲗⲓⲟⲥ <text:line-break/><text:span text:style-name="T1"> </text:span><text:span text:style-name="T2">(123/6) </text:span> ⲉⲧⲃⲉ ⲡⲁⲓ̈ ⲕⲁⲛ ⲉϥϣⲁⲛⲉⲓ ⲉϩⲣⲁⲓ̈ <text:line-break/><text:span text:style-name="T1"> </text:span><text:span text:style-name="T2">(123/7) </text:span> ⲉⲩⲥⲱⲙⲁ̣ ⲙⲛ ⲟⲩ〈ⲟⲩ〉ⲱⲧⲃ ⲉⲃⲟⲗ ⲛ‐ <text:line-break/><text:span text:style-name="T1"> </text:span><text:span text:style-name="T2">(123/8) </text:span> ⲧⲉ ⲟⲩϩⲩ̣ⲗⲏ ⲉⲧⲃⲉ ⲧⲟⲩⲙⲛⲧ’‐ <text:line-break/><text:soft-page-break/><text:span text:style-name="T1"> </text:span><text:span text:style-name="T2">(123/9) </text:span> ⲡⲁⲛ[ⲧ]ⲉ̣[ⲗⲓ]ⲟⲥ ⲙⲁⲩϫⲓ ⲛ ⲟⲩⲧⲁⲉⲓⲟ <text:line-break/><text:span text:style-name="T1"> </text:span><text:span text:style-name="T2">(123/10) </text:span> ⲛϩⲟⲩⲟ· ⲉⲧⲉ ⲉⲃⲟⲗ ⲙⲙⲟϥ ⲡⲉ <text:line-break/><text:span text:style-name="T1"> </text:span><text:span text:style-name="T2">(123/11) </text:span> ⲛⲁⲓ̈ ⲧⲏⲣⲟⲩ ⲉⲩϫⲏⲕ ⲉⲃⲟⲗ ⲙⲛ <text:line-break/><text:span text:style-name="T1"> </text:span><text:span text:style-name="T2">(123/12) </text:span> [ⲛ]ⲏ ⲉⲧⲛⲙⲙⲁϥ· ⲕⲁⲓⲅⲁⲣ ⲡⲟⲩⲁ <text:line-break/><text:span text:style-name="T1"> </text:span><text:span text:style-name="T2">(123/13) </text:span> ⲡⲟⲩⲁ ⲛⲧⲉ ⲛⲓⲉⲱⲛ ⲟⲩⲛⲧⲁϥ ⲙ‐ <text:line-break/><text:span text:style-name="T1"> </text:span><text:span text:style-name="T2">(123/14) </text:span> [ⲙ]ⲁⲩ ⲛ ϩⲉⲛⲁⲛⲧⲃⲁ ⲛⲛ ⲉⲱⲛ ⲛ‐ <text:line-break/><text:span text:style-name="T1"> </text:span><text:span text:style-name="T2">(123/15) </text:span> ϩⲣⲁⲓ̈ ⲛϩⲏⲧϥ ϩⲓⲛⲁ ⲉϥϣⲟⲟⲡ’ ϩⲓ ⲟⲩ‐ <text:line-break/><text:span text:style-name="T1"> </text:span><text:span text:style-name="T2">(123/16) </text:span> ⲙⲁ ϫⲉ ⲉϥⲉϣⲱⲡⲉ ⲛⲛ ⲟⲩⲉⲱⲛ <text:line-break/><text:span text:style-name="T1"> </text:span><text:span text:style-name="T2">(123/17) </text:span> ⲛ ⲧⲉⲗ̣ⲓⲟⲥ· ⲉϥϣⲟⲟⲡ’ ⲇⲉ ϩⲛ ϯ‐ <text:line-break/><text:span text:style-name="T1"> </text:span><text:span text:style-name="T2">(123/18) </text:span> [ⲙⲛⲧ’ⲙ]ⲁ̣[ⲕ]ⲁⲣⲓⲟⲥ ⲛⲧⲉ ⲡⲓϣⲙⲧ’‐ <text:line-break/><text:span text:style-name="T1"> </text:span><text:span text:style-name="T2">(123/19) </text:span> [ϭⲟⲙ ⲛ ⲧⲉ]ⲗⲓⲟⲥ ⲛ ⲁϩⲟⲣⲁⲧⲟⲛ <text:line-break/><text:span text:style-name="T1"> </text:span><text:span text:style-name="T2">(123/20) </text:span> [ⲙ ⲡ̅ⲛ̅ⲁ̅ ...]ⲱϥ ⲙ ⲡⲓⲕⲁ ⲣⲱϥ ⲛ <text:line-break/><text:span text:style-name="T1"> </text:span><text:span text:style-name="T2">(123/21) </text:span> [........]ⲧⲉ ⲉⲧⲟⲩⲣ ϣⲟⲣⲡ’ <text:line-break/><text:span text:style-name="T1"> </text:span><text:span text:style-name="T2">(123/22) </text:span> [.......]ⲟϥ· ⲙⲛ ϯ[ⲅ]ⲛ̣ⲱⲥⲓⲥ̣ <text:line-break/><text:span text:style-name="T1"> </text:span><text:span text:style-name="T2">(123/23) </text:span> [.......]ⲡ.[ <text:line-break/><text:span text:style-name="T1"> </text:span><text:span text:style-name="T2">(123/24) </text:span> [........] ⲙ [ <text:line-break/><text:span text:style-name="T1"> </text:span><text:span text:style-name="T2">(123/25) </text:span> [........].[ <text:line-break/><text:span text:style-name="T1"> </text:span><text:span text:style-name="T2">(124/1) </text:span> ⲧⲏⲣϥ ⲟⲩⲥⲓⲅⲏ ⲛⲧⲉ ϯⲅⲛⲱⲥⲓⲥ ⲙ <text:line-break/><text:span text:style-name="T1"> </text:span><text:span text:style-name="T2">(124/2) </text:span> ⲙⲉϩⲥⲛⲧⲉ· ⲡⲓϣⲟⲣⲡ’ ⲙ ⲙⲉⲉⲩⲉ <text:line-break/><text:span text:style-name="T1"> </text:span><text:span text:style-name="T2">(124/3) </text:span> ⲛϩⲣⲁⲓ̈ ϩⲛ ⲟⲩϯ ⲙⲉⲧⲉ ⲛⲧⲉ ⲡⲓϣⲙⲧ’‐ <text:line-break/><text:span text:style-name="T1"> </text:span><text:span text:style-name="T2">(124/4) </text:span> ϭⲟⲙ ϫⲉ ⲁϥⲟⲩⲉϩ ⲥⲁϩⲛⲉ ⲛⲁⲥ ⲉ ⲧⲣⲉⲥ‐ <text:line-break/><text:span text:style-name="T1"> </text:span><text:span text:style-name="T2">(124/5) </text:span> ⲉⲓⲙⲉ ⲉⲣⲟϥ· ϩⲓⲛⲁ ϫⲉ ⲉϥⲉϣⲱⲡⲉ <text:line-break/><text:span text:style-name="T1"> </text:span><text:span text:style-name="T2">(124/6) </text:span> ⲙ ⲡⲁⲛⲧⲉⲗⲓⲟⲥ· ⲁⲩⲱ ⲉϥⲉ ⲛ ⲧⲉⲗⲓⲟⲥ <text:line-break/><text:span text:style-name="T1"> </text:span><text:span text:style-name="T2">(124/7) </text:span> ⲛϩⲣⲁⲓ̈ ⲛϩⲏⲧϥ· ⲉⲩⲉⲓⲙ̣ⲉ ⲉⲣⲟϥ ⲉⲃⲟⲗ <text:line-break/><text:span text:style-name="T1"> </text:span><text:span text:style-name="T2">(124/8) </text:span> ϩⲓⲧⲟⲟⲧⲥ ⲛ ⲟⲩⲙⲛⲧϩⲁ̣ⲡⲗⲟⲩⲥ ⲙⲛ <text:line-break/><text:span text:style-name="T1"> </text:span><text:span text:style-name="T2">(124/9) </text:span> ⲟⲩⲙⲛⲧⲙⲁⲕⲁⲣⲓⲟⲥ· ⲁ̣[ⲓ̈ϫⲓ] ⲛ̣ ⲟ̣ⲩ̣ⲙⲛⲧ’‐ <text:line-break/><text:span text:style-name="T1"> </text:span><text:span text:style-name="T2">(124/10) </text:span> ⲁⲅⲁⲑⲟⲥ ⲉⲃⲟⲗ ϩⲓⲧⲟⲟⲧϥ ⲙ ⲡⲏ ⲉⲧⲟⲩ‐ <text:line-break/><text:span text:style-name="T1"> </text:span><text:span text:style-name="T2">(124/11) </text:span> ⲏϩ ⲛⲥⲱϥ ⲛⲧⲉ ⲡⲓⲉⲱⲛ ⲛ ⲃⲁ̅ⲣ̅ⲃ̅ⲏ̅ⲗ̅ⲱ̅ <text:line-break/><text:span text:style-name="T1"> </text:span><text:span text:style-name="T2">(124/12) </text:span> ⲡⲏ ⲉⲧ’ϯ ⲙ ⲡϣⲱⲡⲉ ⲛⲁϥ· ⲛⲉ.[ <text:line-break/><text:span text:style-name="T1"> </text:span><text:span text:style-name="T2">(124/13) </text:span> ⲧⲱϥ ⲁⲛ ⲧⲉ ϯϭⲟⲙ ⲁⲗⲗⲁ ⲧⲁ ⲡⲏ ⲉⲧⲙ‐ <text:line-break/><text:span text:style-name="T1"> </text:span><text:span text:style-name="T2">(124/14) </text:span> ⲙⲁⲩ ⲧⲉ· ⲛⲓⲉⲱⲛ ⲇⲉ ⲉⲧ’ϣⲟⲟⲡ̣ <text:line-break/><text:span text:style-name="T1"> </text:span><text:span text:style-name="T2">(124/15) </text:span> ⲟⲛⲧⲱⲥ ⲉⲩϣⲟⲟⲡ’̣ ϩⲛ ⲟⲩⲥⲓⲅⲏ <text:line-break/><text:span text:style-name="T1"> </text:span><text:span text:style-name="T2">(124/16) </text:span> ⲛⲉⲟⲩⲁⲧⲉⲛⲉⲣⲅⲓⲁ ⲧⲉ ϯϩⲩⲡⲁⲣⲝⲓⲥ̣ <text:line-break/><text:span text:style-name="T1"> </text:span><text:span text:style-name="T2">(124/17) </text:span> ⲁⲩⲱ ⲛⲉⲟⲩⲁⲧ’ϣⲁϫⲉ ⲙⲙⲟ̣ⲥ̣ ⲧ̣ⲉ̣ <text:line-break/><text:span text:style-name="T1"> </text:span><text:span text:style-name="T2">(124/18) </text:span> ϯⲅⲛⲱⲥⲓⲥ ⲛⲧⲉ ⲡⲓⲕ̅ⲗ̅[̅ⲥ̅ ⲉⲧⲧⲁ]‐ <text:line-break/><text:span text:style-name="T1"> </text:span><text:span text:style-name="T2">(124/19) </text:span> ϩⲟ ⲙⲙⲟϥ· ⲉⲁϥⲉⲓ ⲉ[ⲃⲟⲗ ϩⲙ ⲡⲓ]‐ <text:line-break/><text:span text:style-name="T1"> </text:span><text:span text:style-name="T2">(124/20) </text:span> ⲙⲉϩϥⲧⲟⲟⲩ ⲡⲓⲙⲟ̣[....... <text:line-break/><text:span text:style-name="T1"> </text:span><text:span text:style-name="T2">(124/21) </text:span> ⲙⲉⲉⲩⲉ ⲡⲓⲡⲣⲱⲧⲟ[ⲫⲁⲛⲏⲥ ⲛ] <text:line-break/><text:span text:style-name="T1"> </text:span><text:span text:style-name="T2">(124/22) </text:span> ϩⲟ[ⲟ]ⲩⲧ’ ⲛ̣ ⲧⲉ̣ⲗ̣ⲓ̣ⲟ̣ⲥ̣ ⲛ [ⲛⲟⲩⲥ.. <text:line-break/><text:span text:style-name="T1"> </text:span><text:span text:style-name="T2">(124/23) </text:span> [ ]ⲇⲱ̣[....... <text:line-break/><text:span text:style-name="T1"> </text:span><text:span text:style-name="T2">(124/24) </text:span> [ ]. ⲛ [....... <text:line-break/><text:span text:style-name="T1"> </text:span><text:span text:style-name="T2">(125/1) </text:span> ϩⲓⲕⲱⲛ ⲛⲧⲁϥ ⲡⲉ ⲉϥϣⲏϣ ⲛⲙ‐ <text:line-break/><text:span text:style-name="T1"> </text:span><text:span text:style-name="T2">(125/2) </text:span> ⲙⲁϥ ϩⲙ ⲡⲓⲉⲟⲟⲩ ⲙⲛ̣ ϯϭⲟⲙ· ϩⲛ <text:line-break/><text:span text:style-name="T1"> </text:span><text:span text:style-name="T2">(125/3) </text:span> ⲟⲩⲧⲁⲝⲓⲥ ⲇⲉ ⲉϥϫⲟⲥⲉ ⲉⲣⲟϥ <text:line-break/><text:span text:style-name="T1"> </text:span><text:span text:style-name="T2">(125/4) </text:span> ⲁⲩⲱ ⲛϩⲣⲁⲓ̈ ϩⲛ ⲟⲩⲉⲱⲛ ⲁⲛ· <text:line-break/><text:span text:style-name="T1"> </text:span><text:span text:style-name="T2">(125/5) </text:span> ⲉⲩⲛⲧⲁϥ ⲛ ⲛⲁⲓ̈ ⲧⲏⲣⲟⲩ ⲙ ⲡⲣⲏⲧⲉ <text:line-break/><text:span text:style-name="T1"> </text:span><text:span text:style-name="T2">(125/6) </text:span> ⲙ ⲡⲏ ⲉⲩⲟⲛϩ ⲉⲩϣⲟⲟⲡ’ ϩⲓ ⲟⲩⲙⲁ <text:line-break/><text:soft-page-break/><text:span text:style-name="T1"> </text:span><text:span text:style-name="T2">(125/7) </text:span> ⲛϩⲣⲁⲓ̈ ϩⲛ ⲟⲩⲁ· ⲙⲛ ⲡⲓⲉⲱⲛ ⲉⲧ’‐ <text:line-break/><text:span text:style-name="T1"> </text:span><text:span text:style-name="T2">(125/8) </text:span> ϩⲣⲁⲓ̈ ϩ[ⲛⲛ ⲛ]ⲉⲱⲛ ⲉⲩⲛⲧⲁϥ ⲙⲙⲁⲩ <text:line-break/><text:span text:style-name="T1"> </text:span><text:span text:style-name="T2">(125/9) </text:span> ⲛ ⲟⲩⲇⲓ̣[ⲁ]ⲫⲟⲣⲁ ⲉⲥⲉ ⲛ ϥⲧⲟⲟⲩ <text:line-break/><text:span text:style-name="T1"> </text:span><text:span text:style-name="T2">(125/10) </text:span> ⲙⲛ ⲛ̣[ⲓ]ⲕ̣ⲉϣⲱϫⲡ’ ⲧⲏⲣⲟⲩ ⲉⲧ’‐ <text:line-break/><text:span text:style-name="T1"> </text:span><text:span text:style-name="T2">(125/11) </text:span> ϣⲟⲟⲡ’ ϩⲙ̣ ⲡⲓⲙⲁ ⲉ̣ⲧⲙⲙⲁⲩ· ⲡⲓ‐ <text:line-break/><text:span text:style-name="T1"> </text:span><text:span text:style-name="T2">(125/12) </text:span> ⲕⲗ̅ⲥ̅ ⲇⲉ ⲉϥϣⲟⲟⲡ’ ⲟⲛⲧⲱⲥ ⲉⲥ‐ <text:line-break/><text:span text:style-name="T1"> </text:span><text:span text:style-name="T2">(125/13) </text:span> ⲕⲏ ⲇⲉ ⲛⲙⲙⲁϥ ⲛϭⲓ ⲧⲁ ⲛⲓⲉⲟⲟⲩ <text:line-break/><text:span text:style-name="T1"> </text:span><text:span text:style-name="T2">(125/14) </text:span> ⲧⲏⲣⲟⲩ ⲓ̈ⲟ̅ⲩ̅ⲏ̅ⲗ̅· ⲡⲓⲉⲟⲟⲩ ⲛ ϩⲟ‐ <text:line-break/><text:span text:style-name="T1"> </text:span><text:span text:style-name="T2">(125/15) </text:span> ⲟ̣ⲩⲧ’ ⲙ ⲡⲁⲣⲑⲉⲛⲟⲥ· ⲉⲧⲉ ⲉ‐ <text:line-break/><text:span text:style-name="T1"> </text:span><text:span text:style-name="T2">(125/16) </text:span> ⲃⲟⲗ ϩⲓⲧⲟⲟⲧⲥ ⲁⲩⲛⲁⲩ ⲉ ⲛⲓⲡⲁⲛ‐ <text:line-break/><text:span text:style-name="T1"> </text:span><text:span text:style-name="T2">(125/17) </text:span> ⲧⲉⲗⲓⲟⲛ ⲧⲏⲣⲟⲩ· ⲛⲉⲧⲁϩⲉ ⲇⲉ <text:line-break/><text:span text:style-name="T1"> </text:span><text:span text:style-name="T2">(125/18) </text:span> [ⲉⲣ]ⲁⲧⲟⲩ ⲛⲛⲁϩⲣⲁϥ ⲡⲉ ⲡⲓϣⲟⲙⲧ’‐ <text:line-break/><text:span text:style-name="T1"> </text:span><text:span text:style-name="T2">(125/19) </text:span> [....].[.]. ⲛ ⲁⲗⲟⲩ· ⲡⲓϣⲙⲧ’‐ <text:line-break/><text:span text:style-name="T1"> </text:span><text:span text:style-name="T2">(125/20) </text:span> [......]ⲥ̣ ⲡⲓⲁⲩⲧⲟⲅⲉⲛⲏⲥ ⲛ <text:line-break/><text:span text:style-name="T1"> </text:span><text:span text:style-name="T2">(125/21) </text:span> [......] ⲉⲩⲛⲧⲁϥ ⲇⲉ ⲙⲙⲁⲩ <text:line-break/><text:span text:style-name="T1"> </text:span><text:span text:style-name="T2">(125/22) </text:span> [.......] ⲛϩⲣⲁⲓ̈ ϩⲛ ⲟⲩⲁ ⲉϥⲧⲟ‐ <text:line-break/><text:span text:style-name="T1"> </text:span><text:span text:style-name="T2">(125/23) </text:span> [.... ⲡ]ⲏ ⲟⲛ ⲉⲧⲁⲙⲁϩⲧⲉ ⲉ ⲡⲓ‐ <text:line-break/><text:span text:style-name="T1"> </text:span><text:span text:style-name="T2">(125/24) </text:span> [......] ⲉϥϣⲟⲟ̣ⲡ’ ϩⲛ̣ [ <text:line-break/><text:span text:style-name="T1"> </text:span><text:span text:style-name="T2">(125/25) </text:span> [.......]ϭⲁ[ <text:line-break/><text:span text:style-name="T1"> </text:span><text:span text:style-name="T2">(126/1) </text:span> ⲡⲉ ⲛⲧⲉ ϩⲉⲛⲁⲛⲧⲃⲁ ⲛ ⲕⲱⲃ· ⲡⲓ‐ <text:line-break/><text:span text:style-name="T1"> </text:span><text:span text:style-name="T2">(126/2) </text:span> ϣⲟⲣⲡ’ ⲇⲉ ⲛⲛ ⲉⲱⲛ ⲉⲧ’ϣⲟⲟⲡ’ <text:line-break/><text:span text:style-name="T1"> </text:span><text:span text:style-name="T2">(126/3) </text:span> ⲛϩⲏⲧϥ ⲉⲧⲉ ⲉⲃⲟⲗ ⲙⲙⲟϥ ⲡⲉ <text:line-break/><text:span text:style-name="T1"> </text:span><text:span text:style-name="T2">(126/4) </text:span> ⲡⲓϣⲟⲣⲡ’ ⲙ ⲫⲱⲥⲧⲏⲣ· ⲥ̅ⲟ̅ⲗ̅ⲙ̅ⲓ̅ⲥ̅ <text:line-break/><text:span text:style-name="T1"> </text:span><text:span text:style-name="T2">(126/5) </text:span> ⲙⲛ ⲡⲓⲣⲉϥⲟⲩⲉⲛϩ ⲛⲟⲩⲧⲉ ⲉⲃⲟⲗ <text:line-break/><text:span text:style-name="T1"> </text:span><text:span text:style-name="T2">(126/6) </text:span> ⲉⲩⲁⲧⲛ ⲁⲣⲏϫϥ ⲡⲉ ⲕⲁⲧⲁ ⲡⲓⲧⲩ‐ <text:line-break/><text:span text:style-name="T1"> </text:span><text:span text:style-name="T2">(126/7) </text:span> ⲡⲟⲥ ⲉⲧ’ϣⲟⲟⲡ’ ⲛϩⲣⲁ̣ⲓ̈ ϩ̣ⲙ ⲡⲓⲕ̅ⲗ̅ⲥ̅ <text:line-break/><text:span text:style-name="T1"> </text:span><text:span text:style-name="T2">(126/8) </text:span> ⲛⲛ ⲉⲱⲛ ⲙⲛ ⲇ̅ⲟ̅ⲝ̅ⲟ̅ⲙ̅[̅ⲉ̅ⲇ̅]̅ⲱ̅ⲛ̅ <text:line-break/><text:span text:style-name="T1"> </text:span><text:span text:style-name="T2">(126/9) </text:span> ⲡⲓⲙⲉϩⲥⲛⲁⲩ ⲛⲛ ⲉⲱ̣[ⲛ] ⲁ̣̅̅ⲕ̅ⲣ̅ⲉ̅ⲙ̅ⲱ̅ⲛ̅ <text:line-break/><text:span text:style-name="T1"> </text:span><text:span text:style-name="T2">(126/10) </text:span> ⲡⲓⲁⲧ’ϣⲁϫⲉ ⲙⲙⲟϥ ⲉⲩⲛ̣ⲧⲁϥ <text:line-break/><text:span text:style-name="T1"> </text:span><text:span text:style-name="T2">(126/11) </text:span> ⲙⲙⲁⲩ ⲙ ⲡⲓⲙⲉϩⲥⲛⲁⲩ ⲙ ⲫⲱⲥ‐ <text:line-break/><text:span text:style-name="T1"> </text:span><text:span text:style-name="T2">(126/12) </text:span> ⲧⲏⲣ· ⲍ̅ⲁ̅ⲭ̅ⲑ̅ⲟ̅ⲥ̅ ⲙⲛ ⲓ̈ⲁ̅ⲭⲑⲟⲥ̅· ⲡⲓ‐ <text:line-break/><text:span text:style-name="T1"> </text:span><text:span text:style-name="T2">(126/13) </text:span> ⲙⲉϩϣⲟⲙⲧ’ ⲇⲉ ⲛⲛ ⲉⲱⲛ ⲡⲉ ⲁⲙ‐ <text:line-break/><text:span text:style-name="T1"> </text:span><text:span text:style-name="T2">(126/14) </text:span> ⲃⲣⲟⲥⲓⲟⲥ ⲡⲓⲡⲁⲣⲑⲉⲛⲟⲥ ⲉⲩⲛⲧ̣ⲁ[ϥ] <text:line-break/><text:span text:style-name="T1"> </text:span><text:span text:style-name="T2">(126/15) </text:span> ⲙⲙⲁⲩ ⲙ ⲡⲓⲙⲉϩϣⲟⲙⲧ’ ⲙ ⲫⲱ‐ <text:line-break/><text:span text:style-name="T1"> </text:span><text:span text:style-name="T2">(126/16) </text:span> ⲥⲧⲏⲣ ⲥ̅ⲏ̅ⲑ̅ⲉ̅ⲩ̅ⲥ̅ ⲙⲛ ⲁⲛⲧⲓⲫⲁ̣ⲛ̣‐ <text:line-break/><text:span text:style-name="T1"> </text:span><text:span text:style-name="T2">(126/17) </text:span> ⲧⲏⲥ· ⲡⲓⲙⲉϩϥⲧⲟⲟⲩ ⲇ[ⲉ] ⲛ[ⲛ ⲉ]‐ <text:line-break/><text:span text:style-name="T1"> </text:span><text:span text:style-name="T2">(126/18) </text:span> ⲱⲛ ⲡⲉ ⲡⲓⲣⲉϥⲥⲙⲟⲩ̣ [..... <text:line-break/><text:span text:style-name="T1"> </text:span><text:span text:style-name="T2">(126/19) </text:span> ⲅⲉⲛⲟⲥ ⲉⲩⲛⲧⲁϥ ⲙⲙ̣[ⲁⲩ ⲙ ⲡⲓⲙⲉϩ]‐ <text:line-break/><text:span text:style-name="T1"> </text:span><text:span text:style-name="T2">(126/20) </text:span> ϥⲧⲟⲟⲩ ⲙ ⲫⲱⲥⲧⲏ[ⲣ ⲥ̅ⲉ̅ⲗ̅ⲇ̅ⲁ̅ⲱ̅] <text:line-break/><text:span text:style-name="T1"> </text:span><text:span text:style-name="T2">(126/21) </text:span> ⲙⲛ ⲉ̅ⲗ̅ⲉ̅ⲛ̅ⲟ̅ⲥ̅· ϣⲁⲩ[..... <text:line-break/><text:span text:style-name="T1"> </text:span><text:span text:style-name="T2">(126/22) </text:span> ⲙ̣ⲉⲛ ⲉ̣[ⲣ]ⲟϥ ⲉⲃⲟⲗ ϩⲓⲧ̣[...... <text:line-break/><text:span text:style-name="T1"> </text:span><text:span text:style-name="T2">(126/23) </text:span> [ ]ⲁ̣̅̅ⲣ̅ⲙ̅[ⲏⲇⲱⲛ <text:line-break/><text:span text:style-name="T1"> </text:span><text:span text:style-name="T2">(126/24) </text:span> [ ].[...... <text:line-break/><text:span text:style-name="T1"> </text:span><text:span text:style-name="T2">(127/1) </text:span> ⲫⲟⲏ ⲍⲟⲏ ⲍⲏⲟⲏ ⲍⲏ[..] ⲍ̣ⲱⲥⲓ <text:line-break/><text:span text:style-name="T1"> </text:span><text:span text:style-name="T2">(127/2) </text:span> ⲍⲱⲥⲓ ⲍⲁⲱ ⲍⲏⲟⲟⲟ ⲍⲏⲥⲉⲛ ⲍⲏⲥ‐ <text:line-break/><text:span text:style-name="T1"> </text:span><text:span text:style-name="T2">(127/3) </text:span> ⲉⲛ· ⲥⲉⲟⲛϩ ⲛϭⲓ ⲛⲓⲕⲁⲧⲁ ⲟⲩⲁ ⲁⲩⲱ <text:line-break/><text:span text:style-name="T1"> </text:span><text:span text:style-name="T2">(127/4) </text:span> ⲡⲓϥⲧⲟⲟⲩ ⲉⲧⲉ ⲛ ϣⲙⲟⲩⲛ ⲛ ⲕⲱⲃ <text:line-break/><text:soft-page-break/><text:span text:style-name="T1"> </text:span><text:span text:style-name="T2">(127/5) </text:span> ⲏⲟⲟⲟⲟⲏⲁⲏⲱ ⲛⲧⲟⲕ ⲉⲧ’ϩⲁ ⲧⲉⲩ‐ <text:line-break/><text:span text:style-name="T1"> </text:span><text:span text:style-name="T2">(127/6) </text:span> ⲉϩⲏ ⲁⲩⲱ ⲛⲧⲟⲕ ⲉⲧ’ϩⲛ ⲛⲁⲓ̈ ⲧⲏ‐ <text:line-break/><text:span text:style-name="T1"> </text:span><text:span text:style-name="T2">(127/7) </text:span> ⲣⲟⲩ· ⲁⲩⲱ ⲛⲁⲓ̈ ⲙⲉⲛ ⲉⲩⲛϩⲣⲁⲓ̈ ϩⲙ <text:line-break/><text:span text:style-name="T1"> </text:span><text:span text:style-name="T2">(127/8) </text:span> ⲡⲓⲡⲣⲱ̣ⲧ̣ⲟⲫⲁⲛⲏⲥ ⲛ ⲧⲉⲗⲓⲟⲥ ⲛ <text:line-break/><text:span text:style-name="T1"> </text:span><text:span text:style-name="T2">(127/9) </text:span> ⲁ̅ⲣ̅ⲙ̅ⲏ̣̅̅ⲇ̣̅̅ⲱ̣̅̅ⲛ̅ ⲛ ϩⲟⲟⲩⲧ’· ϯⲉⲛⲉⲣⲅⲓⲁ <text:line-break/><text:span text:style-name="T1"> </text:span><text:span text:style-name="T2">(127/10) </text:span> ⲛⲧⲉ ⲛ̣ⲁ̣[ⲓ̈] ⲧⲏⲣⲟⲩ ⲉⲧ’ϣⲟⲟⲡ’ ϩⲓ ⲟⲩ‐ <text:line-break/><text:span text:style-name="T1"> </text:span><text:span text:style-name="T2">(127/11) </text:span> ⲙⲁ· ⲉⲡⲓⲇⲏ ⲛⲉⲩϣⲟⲟⲡ’ ⲛϭⲓ ⲛⲓ‐ <text:line-break/><text:span text:style-name="T1"> </text:span><text:span text:style-name="T2">(127/12) </text:span> ⲕⲁⲧⲁ ⲟⲩⲁ ⲧⲏⲣⲟⲩ ⲛ ⲧⲉⲗⲓⲟⲥ <text:line-break/><text:span text:style-name="T1"> </text:span><text:span text:style-name="T2">(127/13) </text:span> ⲁⲥⲟⲩⲱⲛϩ ⲉⲃⲟⲗ ⲟⲛ ⲛϭⲓ ϯⲉⲛⲉⲣ‐ <text:line-break/><text:span text:style-name="T1"> </text:span><text:span text:style-name="T2">(127/14) </text:span> ⲅⲓⲁ ⲛⲧⲉ ⲛⲓⲕⲁⲧⲁ ⲟⲩⲁ ⲧⲏⲣⲟⲩ· ⲡⲓ‐ <text:line-break/><text:span text:style-name="T1"> </text:span><text:span text:style-name="T2">(127/15) </text:span> ⲁⲩⲧⲟⲅⲉⲛⲏⲥ ⲛ ⲛⲟⲩⲧⲉ· ⲛⲧⲟϥ <text:line-break/><text:span text:style-name="T1"> </text:span><text:span text:style-name="T2">(127/16) </text:span> ⲙⲉⲛ ⲉϥⲁϩⲉⲣⲁⲧϥ ⲛϩⲣⲁⲓ̈ ϩⲛ ⲟⲩ‐ <text:line-break/><text:span text:style-name="T1"> </text:span><text:span text:style-name="T2">(127/17) </text:span> ⲉⲱⲛ· ⲉⲩⲛ ϥⲧⲟⲟⲩ ⲛ ⲇⲓⲁⲫⲟⲣⲁ <text:line-break/><text:span text:style-name="T1"> </text:span><text:span text:style-name="T2">(127/18) </text:span> ⲛⲧⲉ ϩⲉⲛⲉⲱⲛ ⲛϩⲣⲁⲓ̈ ⲛϩⲏⲧϥ ⲛ‐ <text:line-break/><text:span text:style-name="T1"> </text:span><text:span text:style-name="T2">(127/19) </text:span> [ⲧ]ⲉ ⲛⲓⲁⲩ̣ⲧⲟⲅⲉⲛⲏⲥ· ⲡⲓϣⲟⲣⲡ’ <text:line-break/><text:span text:style-name="T1"> </text:span><text:span text:style-name="T2">(127/20) </text:span> ⲇ̣ⲉ ⲛⲛ [ⲉ]ⲱ̣ⲛ ⲉⲧ’ϣⲟⲟⲡ’ ⲛϩⲏⲧϥ <text:line-break/><text:span text:style-name="T1"> </text:span><text:span text:style-name="T2">(127/21) </text:span> [ⲛ]ⲧⲉ ⲡ[ⲓϣ]ⲟⲣⲡ’ ⲙ ⲫⲱⲥⲧⲏⲣ <text:line-break/><text:span text:style-name="T1"> </text:span><text:span text:style-name="T2">(127/22) </text:span> [ⲁⲣⲙⲟⲍⲏ]ⲗ· ⲟ̅ⲣ̅ⲛ̅ⲉ̅ⲟ̅ⲥ̅ ⲉ̅ⲩⲑⲣⲟⲩ̅ <text:line-break/><text:span text:style-name="T1"> </text:span><text:span text:style-name="T2">(127/23) </text:span> ⲛ̣̅ⲓ̅ⲟ̅ⲥ̅ [ⲡⲏ] ⲁⲩⲙⲟⲩⲧⲉ ⲉⲣ̣ⲟϥ <text:line-break/><text:span text:style-name="T1"> </text:span><text:span text:style-name="T2">(127/24) </text:span> [ϫⲉ .....]ⲁ̣̅.̅[........ <text:line-break/><text:span text:style-name="T1"> </text:span><text:span text:style-name="T2">(127/25) </text:span> [.. ⲡⲓⲙⲉϩ]ⲥ̣ⲛⲁ̣ⲩ ⲇ̣[ⲉ ⲛⲛ ⲉⲱⲛ ⲛⲧⲉ] <text:line-break/><text:span text:style-name="T1"> </text:span><text:span text:style-name="T2">(127/26) </text:span> [ⲡⲓⲙⲉϩⲥⲛ]ⲁ̣ⲓ ⲙ̣ [ⲫⲱⲥⲧⲏⲣ ⲱ̅]‐ <text:line-break/><text:span text:style-name="T1"> </text:span><text:span text:style-name="T2">(127/27) </text:span> [ⲣⲟⲓ̈ⲁⲏⲗ ..]ⲩⲇⲁ̅ⲥ̣̅̅[.]ⲟ̅ⲥ̅· ⲁ̅ⲡ̅[.. <text:line-break/><text:span text:style-name="T1"> </text:span><text:span text:style-name="T2">(128/1) </text:span> ⲁ̅ⲣ̅ⲣ̅ⲟ̅ⲥ̣̅̅[...] ⲡ̣ⲓⲙⲉϩϣⲟⲙⲧ’ ⲇⲉ ⲛ‐ <text:line-break/><text:span text:style-name="T1"> </text:span><text:span text:style-name="T2">(128/2) </text:span> ⲧⲉ ⲡⲓⲙⲉϩϣⲟⲙⲧ’ ⲙ ⲫⲱⲥⲧⲏⲣ <text:line-break/><text:span text:style-name="T1"> </text:span><text:span text:style-name="T2">(128/3) </text:span> ⲇ̅ⲁ̅ⲩ̅ⲉ̅ⲓ̅ⲑ̅ⲉ̅· ⲗ̅ⲁⲣⲁⲛⲉⲩⲥ̅· ⲉ̅ⲡⲓⲫⲁ̅‐ <text:line-break/><text:span text:style-name="T1"> </text:span><text:span text:style-name="T2">(128/4) </text:span> ⲛ̅ⲓ̅ⲟ̅ⲥ̅· ⲉ̅ⲓⲇⲉⲟⲥ̅· ⲡⲓⲙⲉϩϥⲧⲟⲟⲩ <text:line-break/><text:span text:style-name="T1"> </text:span><text:span text:style-name="T2">(128/5) </text:span> ⲇⲉ ⲛⲧⲉ ⲡⲓⲙⲉϩϥⲧⲟⲟⲩ ⲙ ⲫⲱ‐ <text:line-break/><text:span text:style-name="T1"> </text:span><text:span text:style-name="T2">(128/6) </text:span> ⲥⲧⲏⲣ ⲏ̅ⲗ̅ⲏ̅ⲗ̅ⲏ̅ⲑ̅· ⲕ̅ⲟⲇⲏⲣⲏ̅· ⲉ̅ⲡⲓ̅‐ <text:line-break/><text:span text:style-name="T1"> </text:span><text:span text:style-name="T2">(128/7) </text:span> ⲫ̅ⲁ̅ⲛ̅ⲓ̅ⲟ̅ⲥ̅· ⲁⲗⲗⲟⲅⲉⲛⲓⲟⲥ̣[·] ⲛ̣ⲓⲕⲟ‐ <text:line-break/><text:span text:style-name="T1"> </text:span><text:span text:style-name="T2">(128/8) </text:span> ⲟⲩⲉ ⲇⲉ ⲧⲏⲣⲟⲩ ⲉⲧ’ϣⲟ̣[ⲟ]ⲡ’ ϩⲛ ϯ‐ <text:line-break/><text:span text:style-name="T1"> </text:span><text:span text:style-name="T2">(128/9) </text:span> ϩⲩⲗⲏ ⲛⲧⲟⲟⲩ ⲧⲏⲣⲟⲩ ⲛ̣[ⲉⲩ]ϭⲉⲉⲧ’ <text:line-break/><text:span text:style-name="T1"> </text:span><text:span text:style-name="T2">(128/10) </text:span> ⲡⲉ· ⲁⲩⲱ ⲉⲧⲃⲉ ⲟⲩⲅⲛⲱ[ⲥ]ⲓ̣ⲥ ⲛⲧⲉ <text:line-break/><text:span text:style-name="T1"> </text:span><text:span text:style-name="T2">(128/11) </text:span> ⲟⲩⲙⲛⲧⲛⲟϭ ⲙⲛ ⲟⲩⲧⲟⲗⲙⲏ ⲁⲩⲱ <text:line-break/><text:span text:style-name="T1"> </text:span><text:span text:style-name="T2">(128/12) </text:span> ⲟⲩϭⲟⲙ ⲉⲁⲩϣⲱⲡⲉ ⲁⲩⲱ ⲁⲩ‐ <text:line-break/><text:span text:style-name="T1"> </text:span><text:span text:style-name="T2">(128/13) </text:span> ⲥⲉⲗⲥⲱⲗⲟⲩ· ⲉⲁⲩⲣ ⲁⲧ’ⲉⲓⲙⲉ ⲉ ⲡ‐ <text:line-break/><text:span text:style-name="T1"> </text:span><text:span text:style-name="T2">(128/14) </text:span> ⲛⲟⲩⲧⲉ ⲥⲉⲛⲁⲃⲱⲗ ⲉⲃⲟⲗ· ⲉⲓⲥ ϩⲏ‐ <text:line-break/><text:span text:style-name="T1"> </text:span><text:span text:style-name="T2">(128/15) </text:span> ⲏⲧⲉ ⲍ̅ⲱ̅ⲥ̅ⲧ̅ⲣ̅ⲓ̅ⲁ̅ⲛ̅ⲉ̅ ⲁⲕⲥⲱⲧⲙ <text:line-break/><text:span text:style-name="T1"> </text:span><text:span text:style-name="T2">(128/16) </text:span> ⲉⲣⲟⲟⲩ ⲧⲏⲣⲟⲩ ⲛⲁⲓ̈ ⲉⲧⲉ ⲛⲓⲛⲟⲩⲧⲉ <text:line-break/><text:span text:style-name="T1"> </text:span><text:span text:style-name="T2">(128/17) </text:span> ⲉ ⲛ ⲁⲧ’ⲉⲓⲙⲉ ⲉⲣⲟⲟⲩ· ⲁⲩⲱ ⲉⲩⲉ ⲛ‐ <text:line-break/><text:span text:style-name="T1"> </text:span><text:span text:style-name="T2">(128/18) </text:span> ⲛ ⲁⲧⲛ ⲁⲣⲏϫⲛⲟⲩ ⲛ ϩⲉⲛⲁⲅⲅⲉⲗⲟⲥ <text:line-break/><text:span text:style-name="T1"> </text:span><text:span text:style-name="T2">(128/19) </text:span> ⲁⲛⲟⲕ ⲇⲉ ⲁⲓ̈ⲧⲟⲗⲙⲁ ⲡⲉ[ϫ]ⲁ̣ⲓ̈ ϫⲉ ⲉ[ⲧⲓ] <text:line-break/><text:span text:style-name="T1"> </text:span><text:span text:style-name="T2">(128/20) </text:span> ⲟⲛ ϯⲕⲱⲧⲉ ⲉⲧⲃⲉ ⲡⲓϣ̣ⲙ̣ⲧ’ϭⲟⲙ [ⲛ]‐ <text:line-break/><text:span text:style-name="T1"> </text:span><text:span text:style-name="T2">(128/21) </text:span> ⲛ ⲁⲧⲛⲁⲩ ⲉⲣⲟϥ ⲛ ⲧⲉⲗⲓ[ⲟⲥ] ⲙ ⲡ̅ⲛ̅[ⲁ̅] <text:line-break/><text:span text:style-name="T1"> </text:span><text:span text:style-name="T2">(128/22) </text:span> ⲡⲱⲥ ϥϣⲟⲟⲡ’ ⲛⲁϥ ⲁⲩ̣[..]...[ϥ]‐ <text:line-break/><text:span text:style-name="T1"> </text:span><text:span text:style-name="T2">(128/23) </text:span> ⲉⲓϭ̣ⲉ ⲉ ⲛⲁⲓ̈ ⲧⲏⲣⲟⲩ· ⲙ[.. .]ⲏ ⲉⲧ’ <text:line-break/><text:span text:style-name="T1"> </text:span><text:span text:style-name="T2">(128/24) </text:span> ϣ̣[ⲟ]ⲟ̣ⲡ’ ⲟⲛⲧⲱⲥ ⲉⲙ[....]ⲧⲉ̣ⲥ̣ <text:line-break/><text:soft-page-break/><text:span text:style-name="T1"> </text:span><text:span text:style-name="T2">(128/25) </text:span> [.....]ⲉ[.]ϫ[..] ⲁ̣ϣ ⲡⲉ ⲡ[..... <text:line-break/><text:span text:style-name="T1"> </text:span><text:span text:style-name="T2">(128/26) </text:span> [.......]ⲙ̣ⲁ̣[..]ⲩ̣ ⲏ%0 ⲟ̣[....... <text:line-break/><text:span text:style-name="T1"> </text:span><text:span text:style-name="T2">(128/27) </text:span> [......]. ⲛⲧⲉ̣[.]ϫⲟⲟ̣[...... <text:line-break/><text:span text:style-name="T1"> </text:span><text:span text:style-name="T2">(129/1) </text:span> ⲟⲩ ⲉⲙⲁⲧⲉ ⲁⲩⲕⲁⲁ[ⲧ’ ⲁ]ⲩⲃⲱⲕ· <text:line-break/><text:span text:style-name="T1"> </text:span><text:span text:style-name="T2">(129/2) </text:span> ⲁⲩⲱ ⲁϥⲉⲓ ⲛⲛⲁϩⲣⲁⲓ̈ ⲛϭⲓ ⲁ̅ⲡ̅ⲟ̅ⲫ̅ⲁ̅ⲛ̅ⲧ̅ⲏ̅ⲥ̅· <text:line-break/><text:span text:style-name="T1"> </text:span><text:span text:style-name="T2">(129/3) </text:span> ⲙⲛ ⲁ̅ⲫ̅ⲣ̅ⲟ̅ⲡ̅ⲁ̅ⲓ̅ⲥ̅· ⲡⲁⲣⲑⲉⲛⲱⲫⲱⲧⲟⲥ· <text:line-break/><text:span text:style-name="T1"> </text:span><text:span text:style-name="T2">(129/4) </text:span> ⲁⲩⲱ ⲁϥⲛⲧ’ ⲉϩⲟⲩⲛ ⲉ ⲡⲓⲡⲣⲱⲧⲟⲫⲁ‐ <text:line-break/><text:span text:style-name="T1"> </text:span><text:span text:style-name="T2">(129/5) </text:span> ⲛⲏⲥ ⲛ ⲛⲟϭ ⲛ ϩⲟⲟⲩⲧ’ ⲛ ⲧⲉⲗⲓⲟⲥ ⲛ <text:line-break/><text:span text:style-name="T1"> </text:span><text:span text:style-name="T2">(129/6) </text:span> ⲛⲟⲩⲥ· ⲁⲩⲱ ⲁⲓ̈ⲛⲁⲩ ⲉ ⲛⲁⲓ̈ ⲧⲏⲣⲟⲩ <text:line-break/><text:span text:style-name="T1"> </text:span><text:span text:style-name="T2">(129/7) </text:span> ⲉⲧⲙⲙⲁ̣ⲩ ⲙ ⲡⲣⲏⲧⲉ ⲉⲧⲟⲩϣⲟⲟⲡ’ <text:line-break/><text:span text:style-name="T1"> </text:span><text:span text:style-name="T2">(129/8) </text:span> ⲙⲙⲟⲥ ⲛ̣ϩⲣⲁⲓ̈ ϩⲛ ⲟⲩⲁ· ⲁⲩⲱ ⲁⲉⲓϩⲱ‐ <text:line-break/><text:span text:style-name="T1"> </text:span><text:span text:style-name="T2">(129/9) </text:span> ⲧⲡ’ ⲛⲙⲙ̣ⲁⲩ ⲧⲏⲣⲟⲩ ⲁⲉⲓⲥⲙⲟⲩ <text:line-break/><text:span text:style-name="T1"> </text:span><text:span text:style-name="T2">(129/10) </text:span> ⲉ ⲡⲓⲉⲱ̣ⲛ ⲛ ⲕ̅ⲗ̅ⲥ̅ ⲙⲛ ϯⲃⲁⲣⲃⲏⲗⲱ <text:line-break/><text:span text:style-name="T1"> </text:span><text:span text:style-name="T2">(129/11) </text:span> ⲙ ⲡⲁⲣⲑⲉⲛⲟⲥ ⲙⲛ ⲡⲓⲁϩⲟⲣⲁⲧⲟⲛ <text:line-break/><text:span text:style-name="T1"> </text:span><text:span text:style-name="T2">(129/12) </text:span> ⲙ ⲡ̅ⲛ̅ⲁ̅· ⲁⲩⲱ ⲁⲉⲓϣⲱⲡⲉ ⲙ ⲡⲁⲛ‐ <text:line-break/><text:span text:style-name="T1"> </text:span><text:span text:style-name="T2">(129/13) </text:span> ⲧⲉⲗⲓⲟⲥ ⲁⲉⲓϫⲓ ϭⲟⲙ ⲁⲩⲥⲁϩⲧ’ <text:line-break/><text:span text:style-name="T1"> </text:span><text:span text:style-name="T2">(129/14) </text:span> ϩⲙ ⲡⲉⲟⲟⲩ ⲁⲩⲣ ⲥⲫⲣⲁⲅⲓⲍⲉ ⲙ‐ <text:line-break/><text:span text:style-name="T1"> </text:span><text:span text:style-name="T2">(129/15) </text:span> ⲙⲟⲉⲓ· ⲁⲉⲓϫⲓ ⲛ ⲟⲩⲕⲗⲟⲙ ⲛ ⲧⲉ‐ <text:line-break/><text:span text:style-name="T1"> </text:span><text:span text:style-name="T2">(129/16) </text:span> ⲗⲓⲟⲥ ⲙ ⲡⲓⲙⲁ ⲉⲧⲙⲙⲁⲩ ⲁⲓ̈ⲉⲓ <text:line-break/><text:span text:style-name="T1"> </text:span><text:span text:style-name="T2">(129/17) </text:span> ⲉⲃⲟⲗ ⲉ ⲛⲓⲕⲁⲧⲁ ⲟⲩⲁ ⲛ ⲧⲉⲗⲓⲟⲥ <text:line-break/><text:span text:style-name="T1"> </text:span><text:span text:style-name="T2">(129/18) </text:span> ⲁⲩⲱ ⲛⲁⲩϣⲓⲛⲉ ⲙⲙⲟⲉⲓ ⲧⲏ‐ <text:line-break/><text:span text:style-name="T1"> </text:span><text:span text:style-name="T2">(129/19) </text:span> ⲣⲟⲩ ⲡⲉ· ⲛⲉⲩⲥⲱⲧⲙ ⲉ ⲛⲓⲙⲛ‐ <text:line-break/><text:span text:style-name="T1"> </text:span><text:span text:style-name="T2">(129/20) </text:span> ⲧⲛⲟϭ ⲛⲧⲉ ϯⲅⲛⲱⲥⲓⲥ ⲛⲉⲩⲧⲉ‐ <text:line-break/><text:span text:style-name="T1"> </text:span><text:span text:style-name="T2">(129/21) </text:span> ⲗ̣ⲏⲗ ⲙ[ⲙⲟ]ⲟⲩ ⲡⲉ· ⲁⲩⲱ ⲛⲉⲩ‐ <text:line-break/><text:span text:style-name="T1"> </text:span><text:span text:style-name="T2">(129/22) </text:span> ϫ̣ⲓ ϭⲟⲙ[·] ⲁ̣ⲩⲱ ⲁⲛⲟⲕ ⲟⲛ ⲉⲧⲁⲓ̈‐ <text:line-break/><text:span text:style-name="T1"> </text:span><text:span text:style-name="T2">(129/23) </text:span> ⲉⲓ ⲉϩⲣ[ⲁⲓ̈] ⲉ ⲛⲓⲉⲱⲛ ⲛⲧⲉ ⲛⲓⲁⲩ‐ <text:line-break/><text:span text:style-name="T1"> </text:span><text:span text:style-name="T2">(129/24) </text:span> ⲧ̣ⲟ̣ⲅⲉ̣[ⲛ]ⲏ̣ⲥ ⲁⲉⲓϫⲓ ⲛⲛ ⲟⲩⲉⲓⲛ̣[ⲉ ⲙ̅] <text:line-break/><text:span text:style-name="T1"> </text:span><text:span text:style-name="T2">(129/25) </text:span> ⲙ̣ⲉ̣ ⲉ[ϥⲧ]ⲟⲩⲃⲏⲩ ⲉϥⲙⲡ̣ϣⲁ <text:line-break/><text:span text:style-name="T1"> </text:span><text:span text:style-name="T2">(129/26) </text:span> ⲛ ⲧⲁⲓ[ⲥⲑ]ⲏ̣ⲥⲓⲥ· ⲁⲓ̈ⲉⲓ ⲉϩⲣⲁⲓ̣̈ ⲉ <text:line-break/><text:span text:style-name="T1"> </text:span><text:span text:style-name="T2">(129/27) </text:span> ⲛⲓⲁⲛⲧⲓⲧⲩⲡⲟⲥ ⲛⲛ ⲉⲱⲛ̣ <text:line-break/><text:span text:style-name="T1"> </text:span><text:span text:style-name="T2">(129/28) </text:span> ⲁⲩⲱ ⲁ̣[ⲓ̈]ⲉⲓ ⲉⲃⲟⲗ ⲙⲙⲁⲩ ⲉϩ[ⲣⲁⲓ̈] <text:line-break/><text:span text:style-name="T1"> </text:span><text:span text:style-name="T2">(130/1) </text:span> ⲉ ⲡⲕ̣[ⲁϩ ⲛ]ⲛ̣ ⲁⲏⲣ· ⲁⲩⲱ ⲁⲓ̈ⲥϩⲁⲓ̈ ⲛ <text:line-break/><text:span text:style-name="T1"> </text:span><text:span text:style-name="T2">(130/2) </text:span> ϣⲟⲙⲧ’ ⲙ ⲡⲩⲝⲟⲥ ⲁⲉⲓⲕⲁⲁⲩ <text:line-break/><text:span text:style-name="T1"> </text:span><text:span text:style-name="T2">(130/3) </text:span> ⲉⲩⲅⲛⲱⲥⲓⲥ ⲛ ⲛⲏ ⲉⲧⲛⲏⲩ ⲙⲛⲛ‐ <text:line-break/><text:span text:style-name="T1"> </text:span><text:span text:style-name="T2">(130/4) </text:span> ⲥⲱⲉⲓ ⲛⲓⲥⲱⲧⲡ’ ⲉⲧⲟⲛϩ· ⲁⲩⲱ ⲁ‐ <text:line-break/><text:span text:style-name="T1"> </text:span><text:span text:style-name="T2">(130/5) </text:span> ⲛⲟⲕ ⲁⲓ̈ⲉⲓ ⲉϩⲣⲁⲓ̈ ⲉ ⲡⲕⲟⲥⲙⲟⲥ ⲛ‐ <text:line-break/><text:span text:style-name="T1"> </text:span><text:span text:style-name="T2">(130/6) </text:span> ⲛ ⲉⲥⲑⲏⲧⲟⲛ ⲁⲩⲱ ⲁⲓ̈ϯ ⲙ ⲡⲁⲧⲟⲩ‐ <text:line-break/><text:span text:style-name="T1"> </text:span><text:span text:style-name="T2">(130/7) </text:span> ⲱⲧ’ ϩⲓⲱⲱⲧ’ ⲉϥⲉ ⲛⲛ ⲁ̣ⲧ’ⲥⲃⲱ· <text:line-break/><text:span text:style-name="T1"> </text:span><text:span text:style-name="T2">(130/8) </text:span> ⲁⲉⲓϯ ϭⲟⲙ ⲛⲁϥ ⲁⲉⲓⲙⲟⲟϣⲉ ⲉⲉⲓⲧⲁ‐ <text:line-break/><text:span text:style-name="T1"> </text:span><text:span text:style-name="T2">(130/9) </text:span> ϣⲉ ⲟⲉⲓϣ ⲛⲁⲩ ⲧⲏⲣⲟ[ⲩ ⲛ] ϯⲙⲛⲧⲙⲉ· <text:line-break/><text:span text:style-name="T1"> </text:span><text:span text:style-name="T2">(130/10) </text:span> ⲟⲩⲧⲉ ⲛⲓⲙⲛⲧ’ⲁⲅⲅⲉⲗⲟ̣ⲥ ⲛⲧⲉ ⲡⲕⲟ‐ <text:line-break/><text:span text:style-name="T1"> </text:span><text:span text:style-name="T2">(130/11) </text:span> ⲥⲙⲟⲥ ⲟⲩⲧⲉ ⲛⲓⲁⲣⲭⲱⲛ ⲙⲡⲟⲩ‐ <text:line-break/><text:span text:style-name="T1"> </text:span><text:span text:style-name="T2">(130/12) </text:span> ⲛⲁⲩ ⲉⲣⲟⲉⲓ· ⲟⲩⲙⲏⲏϣⲉ ⲅⲁⲣ ⲛ ⲧ̣[ϭⲁ]‐ <text:line-break/><text:span text:style-name="T1"> </text:span><text:span text:style-name="T2">(130/13) </text:span> ⲉⲓⲟ ⲛⲧⲁⲩⲛⲧ ⲉ ⲡⲙⲟⲩ ⲁⲉⲓⲃⲟⲗⲟ̣[ⲩ] <text:line-break/><text:span text:style-name="T1"> </text:span><text:span text:style-name="T2">(130/14) </text:span> ⲉⲃⲟⲗ· ⲟⲩⲙⲏⲏϣⲉ ⲇⲉ ⲉⲩⲥⲟⲣⲙ <text:line-break/><text:span text:style-name="T1"> </text:span><text:span text:style-name="T2">(130/15) </text:span> ⲁⲉⲓⲧⲟⲩⲛⲟⲥⲟⲩ ⲉⲓ̈ϫⲱ ⲙⲙⲟⲥ <text:line-break/><text:span text:style-name="T1"> </text:span><text:span text:style-name="T2">(130/16) </text:span> ϫⲉ ⲉⲓⲙⲉ ⲛⲏ ⲉⲧⲟⲛϩ ⲙⲛ ϯⲥⲡⲟⲣ[ⲁ] <text:line-break/><text:soft-page-break/><text:span text:style-name="T1"> </text:span><text:span text:style-name="T2">(130/17) </text:span> ⲉⲧⲟⲩⲁⲁⲃ ⲛⲧⲉ ⲥ̅ⲏ̅ⲑ̅ ʹ264 ⲙⲡⲣⲧⲟⲩ[ⲟ ⲛ] <text:line-break/><text:span text:style-name="T1"> </text:span><text:span text:style-name="T2">(130/18) </text:span> ⲁⲧ’ⲥⲱⲧⲙ ⲛⲥⲱⲉⲓ· ⲙⲁⲧⲟⲩ ⲛ[ⲉⲥ] <text:line-break/><text:span text:style-name="T1"> </text:span><text:span text:style-name="T2">(130/19) </text:span> ⲡⲉⲧⲛⲛⲟⲩⲧⲉ ϩⲁ ⲡⲛⲟⲩⲧⲉ· ⲁ̣[ⲩⲱ] <text:line-break/><text:span text:style-name="T1"> </text:span><text:span text:style-name="T2">(130/20) </text:span> ϯⲯⲩⲭⲏ ⲛ ⲁⲧ’ⲕⲁϭ[ⲓ]ⲁ̣ ⲉ̣ⲧ’ⲥⲟ̣[ⲧⲡ] <text:line-break/><text:span text:style-name="T1"> </text:span><text:span text:style-name="T2">(130/21) </text:span> ϯ ϭⲟⲙ ⲛⲁⲥ ⲁⲩⲱ ⲁⲛ[ⲁⲩ] ⲉ ⲡⲓⲟⲩ̣‐ <text:line-break/><text:span text:style-name="T1"> </text:span><text:span text:style-name="T2">(130/22) </text:span> ⲱⲧⲃ ⲉⲃⲟⲗ ⲉⲧⲙ ⲡⲓⲙ[ⲁ] ⲁⲩⲱ <text:line-break/><text:span text:style-name="T1"> </text:span><text:span text:style-name="T2">(130/23) </text:span> ⲕ̣ⲱⲧⲉ ⲛⲥⲁ ϯⲙⲛⲧ’ⲁ[ⲧ]ⲙⲓⲥⲉ ⲛ̣‐ <text:line-break/><text:span text:style-name="T1"> </text:span><text:span text:style-name="T2">(130/24) </text:span> ⲛ ⲁⲧⲟⲩⲱⲧⲃ ⲉⲃⲟⲗ [ⲡⲉⲓ]ⲱⲧ’ ⲛⲧ̣ⲉ <text:line-break/><text:span text:style-name="T1"> </text:span><text:span text:style-name="T2">(130/25) </text:span> ⲛⲁⲓ̈ ⲧⲏⲣⲟⲩ ϥⲧⲱϩⲙ [ⲙ]ⲙⲱⲧⲛ <text:line-break/><text:span text:style-name="T1"> </text:span><text:span text:style-name="T2">(130/26) </text:span> ⲉ̣[ⲩⲥ]ⲟϩⲉ ⲛⲏⲧⲛ ⲁⲩⲱ ⲉⲩϫⲓ ⲙⲙⲱ‐ <text:line-break/><text:span text:style-name="T1"> </text:span><text:span text:style-name="T2">(131/1) </text:span> ⲧⲛ ⲛ ϭⲟⲛⲥ ϥⲛⲁⲕⲁ ⲧⲏ̣[ⲛ]ⲉ̣ ⲛⲥⲱϥ ⲁⲛ· <text:line-break/><text:span text:style-name="T1"> </text:span><text:span text:style-name="T2">(131/2) </text:span> ⲙⲡⲣϫⲱⲕⲙ ⲙⲙⲱⲧⲛ ϩⲛ ⲟⲩⲙⲟⲩ· <text:line-break/><text:span text:style-name="T1"> </text:span><text:span text:style-name="T2">(131/3) </text:span> ⲟⲩⲧⲉ ⲙⲡⲣϯ ⲧⲏⲛⲉ ⲛⲧⲟⲟⲧⲟⲩ ⲛ <text:line-break/><text:span text:style-name="T1"> </text:span><text:span text:style-name="T2">(131/4) </text:span> ⲛⲏ ⲉⲧ’ⲑⲉⲃⲓⲏⲩ ⲉⲣⲱⲧⲛ ϩⲁ ⲛⲏ ⲉⲧ’‐ <text:line-break/><text:span text:style-name="T1"> </text:span><text:span text:style-name="T2">(131/5) </text:span> ⲥⲟⲧⲡ’· ⲡⲱⲧ’ ⲛⲧⲟⲟⲧϥ ⲙ ⲡⲓⲗⲓⲃⲉ <text:line-break/><text:span text:style-name="T1"> </text:span><text:span text:style-name="T2">(131/6) </text:span> ⲙⲛ ⲡⲓⲥⲛ̣ⲁϩ ⲛⲧⲉ ϯⲙⲛⲧ’ⲥⲓⲙⲉ· <text:line-break/><text:span text:style-name="T1"> </text:span><text:span text:style-name="T2">(131/7) </text:span> ⲁⲩⲱ ⲥⲱⲧⲡ’ ⲛⲏⲧⲛ ⲙ ⲡⲓⲟⲩϫⲁⲉⲓ <text:line-break/><text:span text:style-name="T1"> </text:span><text:span text:style-name="T2">(131/8) </text:span> ⲛⲧⲉ ϯⲙ̣ⲛⲧ’ϩⲟⲟⲩⲧ’· ⲛⲧⲁⲧⲉⲧⲛ‐ <text:line-break/><text:span text:style-name="T1"> </text:span><text:span text:style-name="T2">(131/9) </text:span> ⲉⲓ ⲁⲛ [ⲉ] ϫ̣[ⲓ] ⲙⲕⲁϩ· ⲁⲗⲗⲁ ⲛⲧⲁⲧⲉⲧⲛ‐ <text:line-break/><text:span text:style-name="T1"> </text:span><text:span text:style-name="T2">(131/10) </text:span> ⲉⲓ ⲉ ⲃⲱⲗ̣ ⲙ ⲡⲉⲧⲛⲥⲛⲁϩ ⲉⲃⲟⲗ· ⲃⲁⲗ <text:line-break/><text:span text:style-name="T1"> </text:span><text:span text:style-name="T2">(131/11) </text:span> ⲧⲏⲛⲉ ⲉⲃⲟⲗ· ⲁⲩⲱ ⲡⲏ ⲉⲧⲁϥⲙⲟⲩⲣ <text:line-break/><text:span text:style-name="T1"> </text:span><text:span text:style-name="T2">(131/12) </text:span> ⲙⲙⲱⲧⲛ ⲉϥⲉⲃⲱⲗ ⲉⲃⲟⲗ· ⲛⲁϩⲙ <text:line-break/><text:span text:style-name="T1"> </text:span><text:span text:style-name="T2">(131/13) </text:span> ⲧⲏⲛⲉ ϩⲓⲛⲉ ϫⲉ ⲉⲣⲉⲧⲏ ⲉⲧⲙⲙⲁⲩ <text:line-break/><text:span text:style-name="T1"> </text:span><text:span text:style-name="T2">(131/14) </text:span> ⲉⲥⲉⲛⲟⲩϩⲙ· ⲡⲓⲭ̅ⲣ̅ⲥ̅ ⲛ ⲉⲓⲱⲧ’ ⲁϥ‐ <text:line-break/><text:span text:style-name="T1"> </text:span><text:span text:style-name="T2">(131/15) </text:span> ⲧⲛⲛⲟⲟⲩ ⲛⲏⲧⲛ ⲙ ⲡⲓⲥⲱⲧⲏⲣ <text:line-break/><text:span text:style-name="T1"> </text:span><text:span text:style-name="T2">(131/16) </text:span> ⲁⲩⲱ ⲁϥϯ ⲛⲏⲧⲛ ⲛ ϯϭⲟⲙ· ⲉⲧⲃⲉ <text:line-break/><text:span text:style-name="T1"> </text:span><text:span text:style-name="T2">(131/17) </text:span> ⲟ̣ⲩ ⲧⲉⲧⲛⲁⲍⲉ· ⲕⲱⲧⲉ ⲉⲩⲕⲱⲧⲉ̣ <text:line-break/><text:span text:style-name="T1"> </text:span><text:span text:style-name="T2">(131/18) </text:span> ⲛⲥⲁ ⲧⲏⲩⲧⲛ· ⲉⲩⲧⲱϩⲙ ⲙⲙⲱ‐ <text:line-break/><text:span text:style-name="T1"> </text:span><text:span text:style-name="T2">(131/19) </text:span> ⲧⲛ ⲥⲱⲧⲙ· ⲟⲩⲕⲟⲩⲉⲓ ⲅⲁⲣ ⲡⲉ <text:line-break/><text:span text:style-name="T1"> </text:span><text:span text:style-name="T2">(131/20) </text:span> [ⲡⲓ]ⲭⲣⲟ̣[ⲛⲟ]ⲥ ⲙⲡⲣⲧⲣⲉⲩⲣ ϩⲁⲗ ⲙ‐ <text:line-break/><text:span text:style-name="T1"> </text:span><text:span text:style-name="T2">(131/21) </text:span> ⲙ̣ⲱⲧ[ⲛ] ⲟⲩⲛⲟϭ ⲡⲉ ⲡⲓⲁⲓⲱⲛ <text:line-break/><text:span text:style-name="T1"> </text:span><text:span text:style-name="T2">(131/22) </text:span> ⲛⲧⲉ ⲡ[ⲓⲁ]ⲓⲱⲛ ⲛⲧⲉ ⲛⲉⲧⲟⲛϩ· <text:line-break/><text:span text:style-name="T1"> </text:span><text:span text:style-name="T2">(131/23) </text:span> ⲙⲛ ϯ[ⲕⲟ]ⲗ̣ⲁⲥⲓⲥ ⲛⲧⲉ ⲛⲏ ⲉⲧⲟ̣ [ⲛ] <text:line-break/><text:span text:style-name="T1"> </text:span><text:span text:style-name="T2">(131/24) </text:span> ⲁⲧ’ⲧⲱ̣ⲧ’ ⲛ ϩⲏⲧ’· ⲟⲩⲛ ⲟⲩⲙⲏ‐ <text:line-break/><text:span text:style-name="T1"> </text:span><text:span text:style-name="T2">(131/25) </text:span> ⲏϣⲉ ⲛ [ⲥ]ⲛⲁϩ ⲕⲱⲧⲉ ⲉⲣⲱⲧⲛ <text:line-break/><text:span text:style-name="T1"> </text:span><text:span text:style-name="T2">(131/26) </text:span> ⲙⲛ ϩⲉⲛⲣⲉϥϯ ⲕⲟⲗⲁⲥⲓⲥ· ʹ264ʹ264ʹ264 <text:line-break/><text:span text:style-name="T1"> </text:span><text:span text:style-name="T2">(132/1) </text:span> ⲡⲱϩ ⲛ̣[ϩⲣ]ⲁ̣ⲓ̈ ϩⲛ ⲟⲩⲕⲟⲩⲉⲓ ⲛ ⲥⲏⲟ[ⲩ] <text:line-break/><text:span text:style-name="T1"> </text:span><text:span text:style-name="T2">(132/2) </text:span> ⲉⲙⲡⲁⲧϥⲧ̣ⲁϩⲱⲧⲛ ⲛϭⲓ ⲡⲓⲧⲁⲕⲟ· <text:line-break/><text:span text:style-name="T1"> </text:span><text:span text:style-name="T2">(132/3) </text:span> ⲁⲛⲁⲩ ⲉ ⲡⲓⲟⲩⲟⲉⲓⲛ ⲡⲱⲧ’ ⲛⲥⲁ‐ <text:line-break/><text:span text:style-name="T1"> </text:span><text:span text:style-name="T2">(132/4) </text:span> ⲃⲟⲗ ⲙ ⲡⲓⲕⲁⲕⲉ· ⲙⲡⲣⲧⲣⲉⲩⲣ ϩⲁⲗ <text:line-break/><text:span text:style-name="T1"> </text:span><text:span text:style-name="T2">(132/5) </text:span> ⲙⲙⲱⲧⲛ ⲡⲣⲟⲥ ⲟⲩⲧⲁⲕⲟ· ʹ26 <text:line-break/><text:span text:style-name="T1"> </text:span><text:span text:style-name="T2">(132/6) </text:span> ⲍⲱⲥⲧⲣⲓⲁⲛⲟⲥ <text:line-break/><text:span text:style-name="T1"> </text:span><text:span text:style-name="T2">(132/7) </text:span> ⲟ̅ⲗ̅ⲍ̅ ⲗ̅ϥ̅ ⲑ̅ⲟⲃ̅ ⲁ̅ⲉϥ̣̅ ⲑ̣̅ⲱ̣ⲅ̅ ⲥ̅ⲱϯ̅ <text:line-break/><text:span text:style-name="T1"> </text:span><text:span text:style-name="T2">(132/8) </text:span> ⲩ̅ⲣ̅ϥ̅ⲑ̅ ⲛ̅ⲗⲭ̅ ⲁ̅ⲉⲗⲱ̣ⲑⲟⲃⲁⲉϥ̅· <text:line-break/><text:span text:style-name="T1"> </text:span><text:span text:style-name="T2">(132/9) </text:span> ⲑ̅ⲱ̅ ⲟ̅ⲗⲍ̅ʹ26 ⲧⲥʹ26ⲗ̅ⲑⲱⲯ̅ ʹ26[ⲗ̅ⲭ̅] 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2:52:17.856752000</meta:creation-date>
    <meta:generator>LibreOffice/26.2.1.2$Windows_X86_64 LibreOffice_project/620$Build-2</meta:generator>
    <dc:date>2026-03-24T14:03:41.281311100</dc:date>
    <meta:editing-duration>PT21M21S</meta:editing-duration>
    <meta:editing-cycles>1</meta:editing-cycles>
    <meta:document-statistic meta:table-count="0" meta:image-count="0" meta:object-count="0" meta:page-count="157" meta:paragraph-count="10" meta:word-count="36439" meta:character-count="245604" meta:non-whitespace-character-count="187237"/>
  </office:meta>
</office:document-meta>
</file>