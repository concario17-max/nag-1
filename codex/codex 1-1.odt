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Antinoou" fo:font-size="11pt" officeooo:rsid="000540ec" officeooo:paragraph-rsid="0015602d" fo:background-color="#ffffff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ntinoou" fo:font-size="11pt" officeooo:paragraph-rsid="0015602d" style:font-size-asian="11pt" style:font-size-complex="11pt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weight="bold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I ) The Prayer of the Apostle Paul</text:p>
      <text:p text:style-name="P2"><text:span text:style-name="T1"> </text:span><text:span text:style-name="T2">(1/3) </text:span> [ⲡⲉⲕⲟⲩ]ⲁⲉⲓ̣ⲛ̣ ⲙⲁϯ̣ ⲛ̣ⲏ̣ⲓ̣ ⲙⲡ̣ⲉ̣ⲕ̣[ⲛⲁⲉ ⲡⲁ]‐ <text:line-break/><text:span text:style-name="T1"> </text:span><text:span text:style-name="T2">(1/4) </text:span> [ⲣⲉϥⲥ]ⲱⲧⲉ ⲥⲱⲧ̣[ⲉ] ⲙ̅ⲙⲁⲉⲓ ϫⲉ <text:line-break/><text:span text:style-name="T1"> </text:span><text:span text:style-name="T2">(1/5) </text:span> [ⲁⲛⲁⲕ] ⲡ̣ⲉⲧⲉ ⲡⲱⲕ’ ⲡ̣[ⲉⲛⲧ]ⲁ̣ϩⲓ̈ⲉⲓ ⲁⲃⲁⲗ· <text:line-break/><text:span text:style-name="T1"> </text:span><text:span text:style-name="T2">(1/6) </text:span> [ϩ]ⲓ̣ⲧ̣ⲟ̣[ⲟⲧⲕ] ⲛ̣̅ⲧⲁⲕ ⲡ[ⲉ ⲡⲁⲛ]ⲟⲩⲥ ⲙⲁϫⲡⲁⲓ̈ <text:line-break/><text:span text:style-name="T1"> </text:span><text:span text:style-name="T2">(1/7) </text:span> ⲛ̣̅ⲧⲁⲕ ⲡⲉ ⲡ̣ⲁⲉϩⲟ ⲟ̣ⲩⲏ̣[ⲛ] ⲛ̣ⲏ̣ⲓ̈ ⲛ̅ⲧⲁⲕ <text:line-break/><text:span text:style-name="T1"> </text:span><text:span text:style-name="T2">(1/8) </text:span> [ⲡ]ⲉ ⲡ̣ⲁⲡⲗⲏⲣⲱⲙⲁ ϣⲁⲡⲧ̅ ⲁⲣⲁⲕ ⲛ̅‐ <text:line-break/><text:span text:style-name="T1"> </text:span><text:span text:style-name="T2">(1/9) </text:span> [ⲧⲁⲕ] ⲡⲉ ⲧ〈ⲁ〉ⲁⲛⲁⲡⲁⲩⲥⲓⲥ ⲙⲁϯ ⲛⲏⲉⲓ ⲙ̅‐ <text:line-break/><text:span text:style-name="T1"> </text:span><text:span text:style-name="T2">(1/10) </text:span> [ⲡⲧ]ⲉⲗⲉⲓⲟⲛ ⲡⲉⲧⲉⲙⲁⲣⲟⲩϣ ⲉⲙⲁϩ‐<text:line-break/><text:span text:style-name="T1"> </text:span><text:span text:style-name="T2">(1/11) </text:span> [ⲧⲉ] ⲙ̅ⲙⲁϥ §ϯⲧⲱⲃϩ̅ ⲙ̅ⲙⲁⲕ ⲡⲉⲧϣⲟ‐ <text:line-break/><text:span text:style-name="T1"> </text:span><text:span text:style-name="T2">(1/12) </text:span> [ⲟⲡ] ⲁ̣ⲩⲱ ⲡⲉⲧϣⲣⲡ̅ ϣⲟⲟⲡ ϩⲙ̅ ⲡⲣⲉⲛ <text:line-break/><text:span text:style-name="T1"> </text:span><text:span text:style-name="T2">(1/13) </text:span> [ⲉⲧϫ]ⲁ̣ⲥⲓ ⲁⲣⲉⲛ ⲛⲓⲙ ϩⲓ̈ⲧⲛ ⲓⲏ(ⲥⲟⲩ)ⲥ ⲡⲉⲭ(ⲣⲓⲥⲧⲟ)ⲥ <text:line-break/><text:span text:style-name="T1"> </text:span><text:span text:style-name="T2">(1/14) </text:span> [ⲡϫⲁⲉⲓ]ⲥ· ⲛ̅ⲛⲓϫⲁⲉⲓⲥ̣ ⲡⲣ̅ⲣⲟ ⲛ̅ⲛⲁⲓⲱⲛ̣ <text:line-break/><text:span text:style-name="T1"> </text:span><text:span text:style-name="T2">(1/15) </text:span> [ⲙⲁϯ] ⲛ̣ⲏⲓ̈ ⲛⲛⲉⲕϯ· ⲉⲧⲉⲙⲁⲕⲣ̅ ϩⲧⲏⲕ <text:line-break/><text:span text:style-name="T1"> </text:span><text:span text:style-name="T2">(1/16) </text:span> [ⲁⲣⲁⲟⲩ] ϩⲓ̈ⲧⲛ̅ ⲡ̣ϣⲏⲣⲉ ⲙ̅ⲡⲣⲱⲙⲉ <text:line-break/><text:span text:style-name="T1"> </text:span><text:span text:style-name="T2">(1/17) </text:span> [ⲡⲉⲡⲛⲉ]ⲩⲙⲁ ⲡⲡⲁⲣⲁⲕⲗⲏⲧⲟⲥ ⲛ̅‐ <text:line-break/><text:span text:style-name="T1"> </text:span><text:span text:style-name="T2">(1/18) </text:span> [ⲧⲙⲉ ⲙ]ⲁ̣[ ]ϯ ⲛⲏⲉⲓ ⲛ̅ⲧⲉⲕⲝⲟⲩⲥⲓⲁ <text:line-break/><text:span text:style-name="T1"> </text:span><text:span text:style-name="T2">(1/19) </text:span> [ⲉⲉⲓ]ⲣ̅ ⲁⲓ̣ⲧ̣ⲓ̣ ⲙ̅ⲙⲁⲕ· ⲙⲁϯ ⲛ̅ⲛⲟⲩ‐ <text:line-break/><text:span text:style-name="T1"> </text:span><text:span text:style-name="T2">(1/20) </text:span> [ⲧⲁⲗ]ϭⲟ ⲙ̅ⲡⲁⲥⲱⲙⲁ· ϩⲱⲥ ⲉ̣ⲉⲓ̣ⲣ̣̅ ⲁⲓⲧⲓ <text:line-break/><text:span text:style-name="T1"> </text:span><text:span text:style-name="T2">(1/21) </text:span> [ⲙⲙⲁ]ⲕ· ϩⲓ̈ⲧⲛ̅ ⲡⲉⲩⲁⲅ·ⲅⲉⲗⲓⲥⲧⲏⲥ <text:line-break/><text:span text:style-name="T1"> </text:span><text:span text:style-name="T2">(1/22) </text:span> [ⲛⲅ]ⲥⲱⲧⲉ ⲛ̅ⲧⲁⲯⲩⲭⲏ· ⲛ̅ⲟⲩⲁⲉⲓⲛ <text:line-break/><text:span text:style-name="T1"> </text:span><text:span text:style-name="T2">(1/23) </text:span> [ϣⲁ ⲉ]ⲛⲏϩⲉ ⲙⲛ̅ ⲡⲁⲡⲛ{ⲉⲩⲙ}ⲁ ⲁⲩⲱ ⲡϣ[ⲣⲡ] <text:line-break/><text:span text:style-name="T1"> </text:span><text:span text:style-name="T2">(1/24) </text:span> [ⲙⲙ]ⲓ̣ⲥⲉ ⲙ̅ⲡⲡⲗⲏⲣⲱⲙⲁ· ⲛ̅ⲧ̣ⲭⲁ̣ⲣⲓ[ⲥ] <text:line-break/><text:span text:style-name="T1"> </text:span><text:span text:style-name="T2">(1/25) </text:span> [ϭⲁⲗ]ⲡ̣ϥ ⲁⲡⲁⲛⲟⲩⲥ· §ⲉⲣⲓ ⲭⲁⲣⲓⲍⲉ ⲛ̅‐ <text:line-break/><text:span text:style-name="T1"> </text:span><text:span text:style-name="T2">(1/26) </text:span> [ⲧⲁⲕ] ⲙ̅ⲡⲉⲧⲉⲛ̅ⲡⲉⲃⲉⲗ ⲛ̅ⲁⲅ·ⲅⲉⲗⲟ̣ⲥ̣ <text:line-break/><text:span text:style-name="T1"> </text:span><text:span text:style-name="T2">(1/27) </text:span> [ⲛⲉ]ⲩ̣ ⲁⲣⲁϥ ⲁⲩⲱ ⲡⲉⲧⲉⲙ̅〈ⲡⲉ〉ⲙⲉϣϫⲉ <text:line-break/><text:span text:style-name="T1"> </text:span><text:span text:style-name="T2">(1/28) </text:span> [ⲛⲁ]ⲣⲭⲱⲛ ⲥⲁⲧⲙⲉϥ ⲁⲩⲱ ⲡⲉⲧⲉ‐ <text:line-break/><text:span text:style-name="T1"> </text:span><text:span text:style-name="T2">(1/29) </text:span> ⲙ[ⲡ]ϥ̅{ⲉ̅ⲓ} ⲁϩⲣⲏⲓ ϩⲙ̅ ⲫⲏⲧ· ⲛ̅ⲣⲱⲙⲉ <text:line-break/><text:span text:style-name="T1"> </text:span><text:span text:style-name="T2">(1/30) </text:span> ⲛ̅ⲧⲁϩϣⲱⲡⲉ ⲛ̅ⲁⲅⲅⲉⲗⲟⲥ ⲁⲩⲱ <text:line-break/><text:span text:style-name="T1"> </text:span><text:span text:style-name="T2">(1/31) </text:span> ⲕⲁⲧⲁ ⲙ̅ⲡⲛⲟⲩⲧⲉ ⲙ̅ⲯⲩ‐ <text:line-break/><text:span text:style-name="T1"> </text:span><text:span text:style-name="T2">(1/32) </text:span> ⲭⲓⲕⲟⲥ ⲛ̅ⲧⲁⲣⲟⲩⲡⲗⲁⲥⲥⲉ ⲙ̅ⲙⲁϥ̣ <text:line-break/><text:span text:style-name="T1"> </text:span><text:span text:style-name="T2">(1/33) </text:span> ϫⲓⲛ ⲛ̅ϣⲁⲣⲡ̅ ϩⲱⲥ ⲉⲟⲩⲛⲧⲏⲉⲓ <text:line-break/><text:span text:style-name="T1"> </text:span><text:span text:style-name="T2">(1/34) </text:span> ⲙ̅ⲙⲉⲩ ⲛ̅ⲧⲡⲓⲥⲧⲓⲥ ⲛ̅ⲑⲉⲗⲡⲓⲥ <text:line-break/><text:span text:style-name="T1"> </text:span><text:span text:style-name="T2">(1/35) </text:span> ⲛ̣̅ⲅⲟⲩⲱϩ ⲁⲧⲟⲟⲧ· ⲙ̅ⲡⲉⲕⲙⲉⲅⲉ‐ <text:line-break/><text:span text:style-name="T1"> </text:span><text:span text:style-name="T2">(1/36) </text:span> ⲑⲟⲥ ⲛ̅ⲁⲅⲁⲡⲏⲧⲟⲥ ⲛ̅ⲉⲕⲗⲉ‐ <text:line-break/><text:span text:style-name="T1"> </text:span><text:span text:style-name="T2">(1/37) </text:span> ⲕⲧⲟⲥ ⲛ̅ⲉⲩⲗⲟⲅⲏⲧⲟⲥ ⲡϣⲣⲡ̅ <text:line-break/><text:span text:style-name="T1"> </text:span><text:span text:style-name="T2">(1/38) </text:span> ⲙ̅ⲙⲓⲥⲉ ⲡϣⲣⲡ̅ ⲛ̅ⲅⲉⲛⲟⲥ· <text:line-break/><text:span text:style-name="T1"> </text:span><text:span text:style-name="T2">(2/1) </text:span> ⲙⲛ ⲡ̣ⲙⲩ̣ⲥⲧⲏ̣ⲣ̣ⲓ̣ⲟⲛ̣ [ⲛ̅ϣⲡⲏ]‐ <text:line-break/><text:span text:style-name="T1"> </text:span><text:span text:style-name="T2">(2/2) </text:span> ⲣⲉ· ⲙ̅[ⲡ]ⲉⲕⲏⲉⲓ ⲁ[ⲃⲁⲗ ϫⲉ] <text:line-break/><text:span text:style-name="T1"> </text:span><text:span text:style-name="T2">(2/3) </text:span> ⲡⲱⲕ [ⲡ]ⲉ̣ ⲡⲉⲙⲁϩ̣ⲧ̣[ⲉ] ⲁ̣[ⲩⲱ] <text:line-break/><text:span text:style-name="T1"> </text:span><text:span text:style-name="T2">(2/4) </text:span> ⲡⲉⲁ̣ⲩ̣ ⲁⲩⲱ ⲧⲉ̣ⲕⲝⲟⲙ̣[ⲟ]‐ <text:line-break/><text:span text:style-name="T1"> </text:span><text:span text:style-name="T2">(2/5) </text:span> ⲗⲟⲅⲏⲥⲓⲥ ⲙⲛ̅ ⲧⲙⲛ̅ⲧⲛ̣[ⲁ]ϭ̣ <text:line-break/><text:span text:style-name="T1"> </text:span><text:span text:style-name="T2">(2/6) </text:span> ϣⲁ ⲉⲛⲏϩⲉ ⲛ̅ⲉⲛⲏϩⲉ̣ [ϩⲁⲙⲏⲛ] <text:line-break/><text:span text:style-name="T1"> </text:span><text:span text:style-name="T2">(2/7) </text:span> §ⲡⲣⲟⲥⲉⲩⲭⲏ ⲡⲁ[ⲩⲗⲟⲩ] <text:line-break/><text:span text:style-name="T1"> </text:span><text:span text:style-name="T2">(2/8) </text:span> ⲁⲡⲟⲥⲧⲟⲗⲟⲩ <text:line-break/><text:span text:style-name="T1"> </text:span><text:span text:style-name="T2">(2/9) </text:span> ⲉⲛ ⲉⲓⲣⲏⲛⲏ <text:line-break/><text:span text:style-name="T1"> </text:span><text:span text:style-name="T2">(2/10) </text:span> ⲟ x(ⲓⲥⲧⲟⲥ) ⲁⲅⲓⲟⲥ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4:03:59.261884100</meta:creation-date>
    <dc:date>2026-03-30T14:04:20.375505900</dc:date>
    <meta:editing-duration>PT21S</meta:editing-duration>
    <meta:editing-cycles>1</meta:editing-cycles>
    <meta:document-statistic meta:table-count="0" meta:image-count="0" meta:object-count="0" meta:page-count="1" meta:paragraph-count="2" meta:word-count="236" meta:character-count="1689" meta:non-whitespace-character-count="1319"/>
    <meta:generator>LibreOffice/26.2.1.2$Windows_X86_64 LibreOffice_project/620$Build-2</meta:generator>
  </office:meta>
</office:document-meta>
</file>