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Text_20_body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XII ) The Sentences of Sextus</text:p>
      <text:p text:style-name="P2"><text:span text:style-name="T1"> </text:span><text:span text:style-name="T2">(1/1) </text:span> [ 8+- ].ⲉⲓⲧ ⲡⲉ ⲛ̅ⲧⲙⲛ̅ⲧⲧⲁⲧⲥⲟ <text:line-break/><text:span text:style-name="T1"> </text:span><text:span text:style-name="T2">(1/2) </text:span> [ⲟⲩⲛ· ⲙⲉⲣⲉ] ⲧⲁⲗⲏⲑⲓⲁ ⲁⲩⲱ ⲡϭⲟⲗ <text:line-break/><text:span text:style-name="T1"> </text:span><text:span text:style-name="T2">(1/3) </text:span> [ⲉⲣⲓⲭⲣⲁⲥⲑ]ⲉ̣ ⲛ̅ⲑⲉ ⲙ̅ⲡⲉⲡϫⲱ ⲡⲕⲉ <text:line-break/><text:span text:style-name="T1"> </text:span><text:span text:style-name="T2">(1/4) </text:span> [ⲣⲟⲥ ⲙⲁⲣϥ̅ⲥⲱ]ⲕ ϩⲏⲧⲟⲩ ⲛ̅ⲛⲉⲕϣⲁ <text:line-break/><text:span text:style-name="T1"> </text:span><text:span text:style-name="T2">(1/5) </text:span> [ϫⲉ· ϣⲁϫⲉ ⲙ̅ⲡ]ⲥⲟⲡ ⲉⲧⲉϣϣⲉ ⲉⲛ <text:line-break/><text:span text:style-name="T1"> </text:span><text:span text:style-name="T2">(1/6) </text:span> [ⲉⲕⲁⲣⲱⲕ ⲉⲧⲃⲉ] ⲛⲉⲧⲕⲥⲟⲟⲩⲛⲉ ⲇⲉ <text:line-break/><text:span text:style-name="T1"> </text:span><text:span text:style-name="T2">(1/7) </text:span> [ⲙ̅ⲙⲟⲟⲩ ⲙ̅ⲡⲥⲟ]ⲡ ⲉⲧⲉϣϣⲉ ⲧⲟⲧⲉ <text:line-break/><text:span text:style-name="T1"> </text:span><text:span text:style-name="T2">(1/8) </text:span> [ϣⲁϫⲉ· ⲡϣⲁϫ]ⲉ ⲉⲡⲉϥⲟⲩⲟⲉⲓϣ ⲁⲛ <text:line-break/><text:span text:style-name="T1"> </text:span><text:span text:style-name="T2">(1/9) </text:span> [ⲟⲩⲙⲛ̅ⲧⲣⲉ ⲡ]ⲉ̣ ⲛ̅ⲟⲩϩⲏⲧ ⲉϥϩⲟⲟⲩ· <text:line-break/><text:span text:style-name="T1"> </text:span><text:span text:style-name="T2">(1/10) </text:span> [ⲙ̅ⲡⲥⲟⲡ ⲉⲧⲉ]ϣ̣ϣⲉ ⲉⲓⲣⲉ ⲙ̅ⲡⲣ̅ⲣ̅ <text:line-break/><text:span text:style-name="T1"> </text:span><text:span text:style-name="T2">(1/11) </text:span> [ⲭⲣⲁⲥⲑⲉ ⲛ̅ⲟⲩ]ϣ̣ⲁϫⲉ· ⲙ̅ⲡⲣ̅ⲟⲩⲱ <text:line-break/><text:span text:style-name="T1"> </text:span><text:span text:style-name="T2">(1/12) </text:span> [ϣ ⲉϣⲁϫⲉ ⲛ̅ϣⲟ]ⲣⲡ̅ ϩⲛ̅ ⲧⲙⲏⲧⲉ ⲛ̅ <text:line-break/><text:span text:style-name="T1"> </text:span><text:span text:style-name="T2">(1/13) </text:span> [ⲟⲩⲙⲏⲏϣⲉ· ⲉⲣ]ⲉⲩⲉⲡⲓⲥⲧⲏⲙⲏ <text:line-break/><text:span text:style-name="T1"> </text:span><text:span text:style-name="T2">(1/14) </text:span> [ⲧⲉ ⲉϣⲁϫⲉ ⲟⲩⲉ]ⲡⲓⲥⲧⲏⲙⲏ ⲟⲛ ⲧⲉ <text:line-break/><text:span text:style-name="T1"> </text:span><text:span text:style-name="T2">(1/15) </text:span> [ⲉⲕⲁⲣⲱϥ· ⲛⲁⲛⲟ]ⲩⲥ ⲉⲧⲣⲉⲩϫⲣⲟ ⲉⲣⲟⲕ <text:line-break/><text:span text:style-name="T1"> </text:span><text:span text:style-name="T2">(1/16) </text:span> [ⲉⲕϫⲉ ⲙⲏⲉ ⲉϩ]ⲟⲩⲟ ⲉⲧⲣⲉⲕϫⲣⲟ <text:line-break/><text:span text:style-name="T1"> </text:span><text:span text:style-name="T2">(1/17) </text:span> [ϩⲛ̅ ⲧⲁⲡⲁⲧⲏ· ⲡ]ⲉⲧϫⲣⲁⲉⲓⲧ ϩⲛ̅ ⲧⲁ <text:line-break/><text:span text:style-name="T1"> </text:span><text:span text:style-name="T2">(1/18) </text:span> [ⲡⲁⲧⲏ ⲥⲉϫⲣⲟ] ⲉⲣⲟϥ ϩⲛ̅ ⲧⲙⲉ· <text:line-break/><text:span text:style-name="T1"> </text:span><text:span text:style-name="T2">(1/19) </text:span> [ϩⲛ̅ϣⲁϫⲉ ⲛ̅ϭⲟⲗ] ϣⲁⲩϣⲱⲡⲉ ⲛ̅ <text:line-break/><text:span text:style-name="T1"> </text:span><text:span text:style-name="T2">(1/20) </text:span> [ⲙⲛ̅ⲧⲣⲉ ⲛ̅ⲛⲉⲑ]ⲟⲟⲩ· ⲟⲩⲛⲟϭ ⲙ̅ⲡⲉ <text:line-break/><text:span text:style-name="T1"> </text:span><text:span text:style-name="T2">(1/21) </text:span> [ⲣⲓⲥⲧⲁⲥⲓⲥ ⲧⲉ ϣ]ⲁ ⲉⲣⲉⲡϭⲟⲗ ⲣ̅ⲁ <text:line-break/><text:span text:style-name="T1"> </text:span><text:span text:style-name="T2">(1/22) </text:span> [ⲛⲁⲅⲕⲏ· ϩⲱⲥ ⲉⲩ]ⲛ̣̅ ⲟⲩⲟⲛ ⲉⲕⲛⲁϫⲉ <text:line-break/><text:span text:style-name="T1"> </text:span><text:span text:style-name="T2">(1/23) </text:span> [ⲙⲏⲉ 7+- ]ⲧϥ̅· ⲁⲩⲱ ⲉϣϫⲉ <text:line-break/><text:span text:style-name="T1"> </text:span><text:span text:style-name="T2">(1/24) </text:span> [ⲕϫⲓ ϭⲟⲗ ⲙⲛ̅ ⲛⲟⲃⲉ] ⲙ̅ⲡⲣ̅ⲁⲡⲁⲧⲁ <text:line-break/><text:span text:style-name="T1"> </text:span><text:span text:style-name="T2">(1/25) </text:span> [ⲛ̅ⲗⲁⲁⲩ ⲛ̅ϩⲟⲩⲟ ⲙ̅]ⲡ̣ⲉⲧⲣ̅ ⲭⲣⲓⲁ ⲛ̅ <text:line-break/><text:span text:style-name="T1"> </text:span><text:span text:style-name="T2">(1/26) </text:span> [ϣⲟϫⲛⲉ· ⲉⲕϣⲁϣ]ⲁ̣ϫⲉ ⲙⲛ̅ⲛ̅ⲥⲁ <text:line-break/><text:span text:style-name="T1"> </text:span><text:span text:style-name="T2">(1/27) </text:span> [ϩⲁϩ ⲕⲛⲁⲛⲁⲩ ⲛ̅ϩⲟⲩ]ⲟ ⲉⲧⲛⲟϥⲣⲉ· <text:line-break/><text:span text:style-name="T1"> </text:span><text:span text:style-name="T2">(1/28) </text:span> [ⲟⲩⲡⲓⲥⲧⲓⲥ ⲡⲉⲉⲓ] ⲡ̣ⲉ ⲉⲧⲥⲱⲕ ϩⲏ <text:line-break/><text:span text:style-name="T1"> </text:span><text:span text:style-name="T2">(1/29) </text:span> [ⲧⲟⲩ ⲛ̅ⲛⲉⲧⲛⲁⲛⲟ]ⲩ̣ⲟⲩ ⲧⲏⲣⲟⲩ· <text:line-break/><text:span text:style-name="T1"> </text:span><text:span text:style-name="T2">(16/1) </text:span> ⲧⲥⲟⲫⲓⲁ ⲥϫⲓ ⲙⲟⲉⲓⲧ̣ [ϩⲏⲧ̅ⲥ̅ ⲛ̅ⲧⲯⲩⲭⲏ] <text:line-break/><text:span text:style-name="T1"> </text:span><text:span text:style-name="T2">(16/2) </text:span> ϣⲁ ϩⲣⲁⲓ̈ ⲉⲡⲙⲁ ⲙ̅ⲡ[ⲛⲟⲩⲧⲉ· ⲙⲛ̅ ⲟⲩ] <text:line-break/><text:span text:style-name="T1"> </text:span><text:span text:style-name="T2">(16/3) </text:span> ⲣⲙⲛⲏⲉⲓ ϣⲟⲟⲡ ⲛ̅ⲧ[ⲁⲗⲏⲑⲓⲁ ⲉⲓⲙⲏ] <text:line-break/><text:span text:style-name="T1"> </text:span><text:span text:style-name="T2">(16/4) </text:span> ⲧⲓ ⲉⲧⲥⲟⲫⲓⲁ· ⲟⲩⲫⲩⲥ[ⲓⲥ ⲙ̅ⲡⲓⲥⲧⲏ ⲙⲛ̅] <text:line-break/><text:span text:style-name="T1"> </text:span><text:span text:style-name="T2">(16/5) </text:span> ϭⲟⲙ̅ ⲙ̅ⲙⲟⲥ ⲉⲧⲣⲉ̣ⲥϣ̣[ⲱⲡⲉ ⲙ̅ⲙⲁⲉⲓϫⲓ] <text:line-break/><text:span text:style-name="T1"> </text:span><text:span text:style-name="T2">(16/6) </text:span> ϭⲟⲗ· ⲟⲩⲫⲩⲥⲓⲥ ⲉⲥⲣ̅ ϩⲟ̣[ⲧⲉ ⲉⲩ̅ⲉⲗⲉⲩⲑⲉ] <text:line-break/><text:span text:style-name="T1"> </text:span><text:span text:style-name="T2">(16/7) </text:span> ⲣⲁ ⲉⲛ ⲧⲉ ⲥⲛⲁϣⲣ̅ⲕⲟ[ⲓⲛⲱⲛⲓ ⲉⲛ ⲉⲧⲡⲓ] <text:line-break/><text:span text:style-name="T1"> </text:span><text:span text:style-name="T2">(16/8) </text:span> ⲥⲧⲓⲥ· ϩⲱⲥ ⲉⲕϣⲟⲟ[ⲡ ⲙ̅ⲡⲓⲥⲧⲟⲥ ⲡⲉ] <text:line-break/><text:span text:style-name="T1"> </text:span><text:span text:style-name="T2">(16/9) </text:span> ⲧⲉϣϣⲉ ⲉϫⲟⲟϥ ⲙ̅[ⲡϣⲁ ⲉⲛ ⲉϩⲟⲩ] <text:line-break/><text:span text:style-name="T1"> </text:span><text:span text:style-name="T2">(16/10) </text:span> ⲟ ⲁⲡⲥⲱⲧⲙ̅· ⲉⲕϣ[ⲁⲛϣⲱⲡⲉ ⲙ̅ⲙⲉⲩ] <text:line-break/><text:span text:style-name="T1"> </text:span><text:span text:style-name="T2">(16/11) </text:span> ⲙⲛ̅ ϩⲛ̅ⲡⲓⲥⲧⲟⲥ ⲟⲩⲱ̣[ϣ ⲉⲥⲱⲧⲙ̅ ⲉϩⲟⲩ] <text:line-break/><text:span text:style-name="T1"> </text:span><text:span text:style-name="T2">(16/12) </text:span> ⲟ ⲉϣⲁϫⲉ· ⲟⲩⲣⲱ[ⲙⲉ ⲙ̅ⲙⲁⲉⲓϩⲏⲇⲟ] <text:line-break/><text:span text:style-name="T1"> </text:span><text:span text:style-name="T2">(16/13) </text:span> ⲛⲏ ⲟⲩⲁⲧϣⲉⲩ ⲡⲉ̣ [ϩⲛ̅ ϩⲱⲃ ⲛⲓⲙ·] <text:line-break/><text:span text:style-name="T1"> </text:span><text:span text:style-name="T2">(16/14) </text:span> ⲉϣⲱⲡⲉ ⲉⲙⲛ̅ ⲛⲟ̣[ⲃⲉ ⲙ̅ⲡ̅ⲣ̅ϣⲁϫⲉ] <text:line-break/><text:span text:style-name="T1"> </text:span><text:span text:style-name="T2">(16/15) </text:span> ϩⲛ̅ ϩⲱⲃ ⲛⲓⲙ ⲛ̅ⲧⲛ̅[ⲡⲛⲟⲩⲧⲉ· ⲛ̅ⲛⲟ] <text:line-break/><text:span text:style-name="T1"> </text:span><text:span text:style-name="T2">(16/16) </text:span> ⲃⲉ ⲛ̅ⲛⲉⲧⲟ ⲛ̅ⲁⲧⲥ[ⲟⲟⲩⲛ ϣⲁⲩϣⲱⲡⲉ] <text:line-break/><text:span text:style-name="T1"> </text:span><text:span text:style-name="T2">(16/17) </text:span> ⲛϣⲱⲥ ⲛ̅ⲛⲉⲛⲧ[ⲁⲩⲧⲥⲁⲃⲟⲟⲩ· ⲛⲉ] <text:line-break/><text:span text:style-name="T1"> </text:span><text:span text:style-name="T2">(16/18) </text:span> ⲉⲓ ⲉⲧⲟⲩϫⲉ ⲟⲩⲁ ⲉ[ⲡⲣⲁⲛ ⲙ̅ⲡⲛⲟⲩ] <text:line-break/><text:soft-page-break/><text:span text:style-name="T1"> </text:span><text:span text:style-name="T2">(16/19) </text:span> ⲧⲉ ⲉⲧⲃⲏⲧⲟⲩ· ⲥⲉ̣[ⲟ ⲛ̅ⲣⲉϥⲙⲟⲩ ⲛ̅ⲁ] <text:line-break/><text:span text:style-name="T1"> </text:span><text:span text:style-name="T2">(16/20) </text:span> ϩⲣⲛ̅ ⲡⲛⲟⲩⲧⲉ· ⲟ[ⲩⲣⲱⲙⲉ ⲛ̅ⲥⲟⲫⲟⲥ] <text:line-break/><text:span text:style-name="T1"> </text:span><text:span text:style-name="T2">(16/21) </text:span> ⲟⲩⲣⲉϥⲣ̅ ⲡⲉⲧⲛⲁ[ⲛⲟⲩϥ ⲡⲉ ⲙⲛ̅ⲛ̅] <text:line-break/><text:span text:style-name="T1"> </text:span><text:span text:style-name="T2">(16/22) </text:span> ⲥⲁ ⲡⲛⲟⲩⲧⲉ[· ⲙⲁⲣⲉⲡⲉⲕⲃⲓⲟⲥ] <text:line-break/><text:span text:style-name="T1"> </text:span><text:span text:style-name="T2">(16/23) </text:span> ⲧⲁϫⲣⲟ ⲛ̅ⲛⲉ[ⲕϣⲁϫⲉ ϩⲁϩⲧⲛ̅ ⲛⲉⲧ] <text:line-break/><text:span text:style-name="T1"> </text:span><text:span text:style-name="T2">(16/24) </text:span> ⲥⲱⲧⲙ̅· ⲡⲉⲧ[ⲉϣϣⲉ ⲉⲛ ⲉⲁⲁϥ ⲟⲩ] <text:line-break/><text:span text:style-name="T1"> </text:span><text:span text:style-name="T2">(16/25) </text:span> ⲇⲉ ⲙ̅ⲡⲣ̅ⲙⲉⲉ̣[ⲩⲉ ⲉⲁⲁϥ· ⲡⲉⲧⲕ̅ⲟⲩ] <text:line-break/><text:span text:style-name="T1"> </text:span><text:span text:style-name="T2">(16/26) </text:span> ⲱϣⲉ ⲉⲧⲣⲉϥ̣[ⲧⲙ̅ϣⲱⲡⲉ ⲛⲉⲕ ⲟⲩⲇⲉ] <text:line-break/><text:span text:style-name="T1"> </text:span><text:span text:style-name="T2">(16/27) </text:span> ⲛ̅ⲧⲟⲕ ϩⲱⲱⲕ̣ [ⲕⲉⲓⲣⲉ ⲙ̅ⲙⲟϥ ⲉⲛ· ⲡⲉ] <text:line-break/><text:span text:style-name="T1"> </text:span><text:span text:style-name="T2">(16/28) </text:span> ⲧⲉ ⲟⲩⲁⲓⲥⲭⲣ̣[ⲟⲛ ⲡⲉ ⲉⲁⲁϥ ⲁⲩⲱ] <text:line-break/><text:span text:style-name="T1"> </text:span><text:span text:style-name="T2">(27/1) </text:span> [ⲟⲩⲣⲱⲙⲉ ⲛ̅ⲥⲟⲫ]ⲟⲥ ⲛ̅ⲧⲟϥ ⲡ̣[ⲉⲧⲁ] <text:line-break/><text:span text:style-name="T1"> </text:span><text:span text:style-name="T2">(27/2) </text:span> [ϩⲟ ⲙ̅ⲡⲛⲟⲩⲧⲉ ⲉ]ⲣⲁⲧϥ̅ ⲛⲣ̅ⲣⲱⲙⲉ̣ <text:line-break/><text:span text:style-name="T1"> </text:span><text:span text:style-name="T2">(27/3) </text:span> [ⲡⲛⲟⲩⲧⲉ] ⲇ̣ⲉ ⲙ̣[ⲉⲉ]ⲩⲉ ⲙ̅ⲡϣⲁ ⲁⲛⲉϥ <text:line-break/><text:span text:style-name="T1"> </text:span><text:span text:style-name="T2">(27/4) </text:span> [ϩⲃⲏⲩⲉ ϩ]ⲣⲁⲓ̈ [ⲉ]ϫⲛ̅ ⲡⲥⲟⲫⲟⲥ· ⲙⲛ̅ <text:line-break/><text:span text:style-name="T1"> </text:span><text:span text:style-name="T2">(27/5) </text:span> [ⲛ̅ⲥⲁ ⲡ]ⲛⲟⲩⲧⲉ ⲙⲛ̅ ⲗⲁⲁⲩ ⲟ ⲛⲉⲗⲉⲩ <text:line-break/><text:span text:style-name="T1"> </text:span><text:span text:style-name="T2">(27/6) </text:span> [ⲑⲉⲣⲟⲥ ]ⲛ̣̅ⲑⲉ ⲙ̅ⲡⲥⲟⲫⲟⲥ ⲛ̅ⲣⲱⲙⲉ· <text:line-break/><text:span text:style-name="T1"> </text:span><text:span text:style-name="T2">(27/7) </text:span> [ϩⲱⲃ ⲛⲓⲙ] ⲡ̣ⲛⲟⲩⲧⲉ ϫⲡⲟⲟⲩ ⲛⲉϥ ⲟⲩ̅ <text:line-break/><text:span text:style-name="T1"> </text:span><text:span text:style-name="T2">(27/8) </text:span> [ⲧⲉϥⲥⲉ ϩ]ⲱⲱϥ ⲛ̅ϭⲓ ⲡⲥⲟⲫⲟⲥ· ⲡⲣⲱ <text:line-break/><text:span text:style-name="T1"> </text:span><text:span text:style-name="T2">(27/9) </text:span> [ⲙⲉ ⲛ̅]ⲥ̣[ⲟ]ⲫⲟⲥ ϥⲣ̅ⲕⲟⲓⲛⲱⲛⲓ ⲉⲧⲙ̅ⲛⲧ <text:line-break/><text:span text:style-name="T1"> </text:span><text:span text:style-name="T2">(27/10) </text:span> [ⲣ̅ⲣ]ⲟ ⲙ̣̅ⲡⲛⲟⲩⲧⲉ ⲟⲩⲣⲱⲙⲉ ⲉϥϩⲟ <text:line-break/><text:span text:style-name="T1"> </text:span><text:span text:style-name="T2">(27/11) </text:span> [ⲟ]ⲩ̣ ϥⲟⲩⲱ̣ϣ ⲉⲛ ⲉⲧⲣⲉⲧⲉⲡⲣⲟⲛⲟⲓ <text:line-break/><text:span text:style-name="T1"> </text:span><text:span text:style-name="T2">(27/12) </text:span> [ⲁ] ⲙ̅ⲡⲛⲟ̣ⲩⲧⲉ ϣⲱⲡⲉ· ⲟⲩⲯⲩⲭⲏ <text:line-break/><text:span text:style-name="T1"> </text:span><text:span text:style-name="T2">(27/13) </text:span> [ⲉⲥ]ϩⲟⲟⲩ ⲥⲡⲏⲧ ⲉⲃⲟⲗ ⲙ̅ⲡⲛⲟⲩ <text:line-break/><text:span text:style-name="T1"> </text:span><text:span text:style-name="T2">(27/14) </text:span> ⲧ̣ⲉ· ϩⲱⲃ ⲛⲓⲙ ⲙⲫⲁⲩⲗⲟⲛ ⲡϫⲁ <text:line-break/><text:span text:style-name="T1"> </text:span><text:span text:style-name="T2">(27/15) </text:span> ϫⲉ ⲡⲉ ⲙ̅ⲡⲛⲟⲩⲧⲉ· ⲡⲉⲧⲙⲉⲉⲩ <text:line-break/><text:span text:style-name="T1"> </text:span><text:span text:style-name="T2">(27/16) </text:span> ⲉ ϩⲣⲁⲓ̈ ⲛ̅ϩⲏⲧⲕ̅ ϫⲟⲟⲥ ϩⲙ̅ ⲡⲉⲕϩⲏⲧ <text:line-break/><text:span text:style-name="T1"> </text:span><text:span text:style-name="T2">(27/17) </text:span> ϫⲉ ⲛ̅ⲧⲟϥ ⲡⲉ ⲡⲣⲱⲙⲉ· ⲡⲙⲁ ⲉ <text:line-break/><text:span text:style-name="T1"> </text:span><text:span text:style-name="T2">(27/18) </text:span> ⲧϥ̅ϣⲟⲟⲡ ⲙ̅ⲙⲉⲩ ⲛ̅ϭⲓ ⲡⲉⲕⲙⲉ <text:line-break/><text:span text:style-name="T1"> </text:span><text:span text:style-name="T2">(27/19) </text:span> ⲉⲩⲉ ϥϣⲟⲟⲡ ⲙ̅ⲙⲉⲩ ⲛ̅ϭⲓ ⲡⲉⲕ <text:line-break/><text:span text:style-name="T1"> </text:span><text:span text:style-name="T2">(27/20) </text:span> [ⲁ]ⲅⲁⲑⲟⲛ· ⲙ̅ⲡⲣ̅ϣⲓⲛⲉ ⲛ̅ⲥⲁ ⲁⲅⲁ <text:line-break/><text:span text:style-name="T1"> </text:span><text:span text:style-name="T2">(27/21) </text:span> [ⲑ]ⲟⲛ ϩⲛ̅ ⲥⲁⲣⲝ· ⲡⲉⲧⲣ̅ⲃⲗⲁⲡⲧⲓ <text:line-break/><text:span text:style-name="T1"> </text:span><text:span text:style-name="T2">(27/22) </text:span> [ⲉ]ⲛ̣ ⲛ̅ⲧⲯⲩⲭⲏ ⲟⲩⲇⲉ ϥⲉⲓⲣⲉ ⲉⲛ ⲙ̅ <text:line-break/><text:span text:style-name="T1"> </text:span><text:span text:style-name="T2">(27/23) </text:span> [ⲡⲣ]ⲱ̣ⲙⲉ· ⲙⲛ̅ⲛ̅ⲥⲁ ⲡⲛⲟⲩⲧⲉ ⲟⲩ <text:line-break/><text:span text:style-name="T1"> </text:span><text:span text:style-name="T2">(27/24) </text:span> [ⲥⲟⲫⲟⲥ] ⲛ̣̅ⲣⲱⲙⲉ ⲉⲣⲓⲧⲓⲙⲁ ⲙ̅ⲙⲟϥ <text:line-break/><text:span text:style-name="T1"> </text:span><text:span text:style-name="T2">(27/25) </text:span> [ⲉⲡⲓⲇⲏ ⲛ̅ⲧⲟ]ϥ ⲡⲉ ⲫⲩⲡⲏⲣⲉⲧⲏⲥ <text:line-break/><text:span text:style-name="T1"> </text:span><text:span text:style-name="T2">(27/26) </text:span> [ⲙ̅ⲡⲛⲟⲩⲧ]ⲉ· ⲡⲥⲱⲙⲁ ⲛ̅ⲧⲉⲕ <text:line-break/><text:span text:style-name="T1"> </text:span><text:span text:style-name="T2">(27/27) </text:span> [ⲯⲩⲭⲏ ⲉⲧⲣⲉ]ϥϩⲣⲟϣ ⲙⲉⲛ ⲟⲩⲙⲛ̅ⲧ <text:line-break/><text:span text:style-name="T1"> </text:span><text:span text:style-name="T2">(27/28) </text:span> [ϣⲟⲩϣⲟ] ⲧⲉ· ⲉϭⲙ̅ϭⲟⲙ ⲇⲉ ⲛ̅ⲣ̅ <text:line-break/><text:span text:style-name="T1"> </text:span><text:span text:style-name="T2">(27/29) </text:span> [ⲕⲁⲧⲁⲥ]ⲧⲓⲗⲉ ⲙ̅ⲙⲟϥ ϩⲛ̅ ⲟⲩⲙⲛ̅ⲧ <text:line-break/><text:span text:style-name="T1"> </text:span><text:span text:style-name="T2">(28/1) </text:span> [ⲣⲙ̅]ⲣ̣[ⲁ]ϣ ⲙ̅ⲡⲥ[ⲟⲡ ⲉⲧⲉϣϣⲉ ⲟⲩ] <text:line-break/><text:span text:style-name="T1"> </text:span><text:span text:style-name="T2">(28/2) </text:span> ⲙⲛ̅ⲧⲙⲁⲕⲁⲣⲓ̣[ⲟⲥ ⲧⲉ· ⲙ̅ⲡⲣ̅ϣⲱ] <text:line-break/><text:span text:style-name="T1"> </text:span><text:span text:style-name="T2">(28/3) </text:span> ⲡⲉ ⲛ̅ⲁⲓⲧⲉⲓⲟⲥ [ⲙⲉ]ⲛ̣ [ⲙ̅ⲡⲙⲟⲩ ⲟⲩⲁ] <text:line-break/><text:span text:style-name="T1"> </text:span><text:span text:style-name="T2">(28/4) </text:span> ⲉⲉⲧⲕ̅· ⲡⲉⲧⲛⲁ[ϫ]ⲓⲧⲕ̅ [ⲉⲃⲟⲗ ϩⲛ̅ ⲥⲱ] <text:line-break/><text:span text:style-name="T1"> </text:span><text:span text:style-name="T2">(28/5) </text:span> ⲙⲁ ⲛ̅ϥⲙⲟⲟⲩⲧⲕ̅ ⲙ̅ⲡⲣ̅ϭ[ⲱⲛⲧ ⲉⲣⲟϥ·] <text:line-break/><text:span text:style-name="T1"> </text:span><text:span text:style-name="T2">(28/6) </text:span> ⲟⲩⲉⲉⲓ ⲉϥϣⲁⲛⲉⲓⲛⲉ ⲙ̅[ⲡⲥⲟⲫⲟⲥ] <text:line-break/><text:span text:style-name="T1"> </text:span><text:span text:style-name="T2">(28/7) </text:span> ⲉⲃⲟⲗ ϩⲙ̅ ⲡⲥⲱⲙⲁ ϩⲛ̅ ⲟ̣[ⲩⲙⲛ̅ⲧϫⲓ] <text:line-break/><text:span text:style-name="T1"> </text:span><text:span text:style-name="T2">(28/8) </text:span> ⲛ̅ϭⲟⲛⲥ̅ ⲙⲁⲗⲗⲟⲛ ⲉϥⲉⲓ[ⲣⲉ ⲙ̅ⲡⲡⲉ] <text:line-break/><text:soft-page-break/><text:span text:style-name="T1"> </text:span><text:span text:style-name="T2">(28/9) </text:span> ⲧⲛⲁⲛⲟⲩϥ ⲛⲉϥ· ⲁⲩⲃⲟⲗ̣ϥ̣̅[ⲅⲁⲣ ⲉ] <text:line-break/><text:span text:style-name="T1"> </text:span><text:span text:style-name="T2">(28/10) </text:span> ⲃⲟⲗ ϩⲛ̅ ϩⲉⲛⲙⲣ̅ⲣⲉ· ⲑⲣ̅ⲧⲉ ⲙ̣̅[ⲡⲙⲟⲩ] <text:line-break/><text:span text:style-name="T1"> </text:span><text:span text:style-name="T2">(28/11) </text:span> ϣⲁⲥⲣ̅ⲗⲩⲡⲉⲓ ⲙ̅ⲡⲣⲱⲙ[ⲉ] ⲉⲃⲟ[ⲗ ϩⲛ̅] <text:line-break/><text:span text:style-name="T1"> </text:span><text:span text:style-name="T2">(28/12) </text:span> ⲧⲙⲛ̅ⲧⲁⲧⲥⲟⲟⲩⲛ ⲛ̅ⲧⲯⲩ̣ⲭⲏ· [ⲧⲥⲏ] <text:line-break/><text:span text:style-name="T1"> </text:span><text:span text:style-name="T2">(28/13) </text:span> ϥⲉ ⲉⲧⲙⲟⲩⲧ ⲣⲱⲙⲉ 〈ⲛⲉⲛⲁⲛⲟⲩⲥ〉 ⲛⲉⲕ̣ ⲙⲉⲛ̣ <text:line-break/><text:span text:style-name="T1"> </text:span><text:span text:style-name="T2">(28/14) </text:span> ⲉⲧⲙ̅ⲧⲣⲉⲥϣⲱⲡⲉ· ⲛ̅ⲧⲉⲣⲉⲥϣ̣[ⲱ] <text:line-break/><text:span text:style-name="T1"> </text:span><text:span text:style-name="T2">(28/15) </text:span> ⲡⲉ ⲇⲉ ϫⲟⲟⲥ ϩⲙ̅ ⲡⲉⲕϩⲏⲧ ϫⲉ ⲥϣⲟ <text:line-break/><text:span text:style-name="T1"> </text:span><text:span text:style-name="T2">(28/16) </text:span> ⲟⲡ ⲉⲛ· ⲟⲩⲉ ⲉϥϫⲱ ⲙ̅ⲙⲟⲥ ϫⲉ ⲉⲉⲓ <text:line-break/><text:span text:style-name="T1"> </text:span><text:span text:style-name="T2">(28/17) </text:span> ⲣ̅ⲡⲓⲥⲧⲉⲩⲉ ⲕⲁⲛ ⲉϥϣⲁⲛⲣ̅ ⲟⲩⲛⲟϭ <text:line-break/><text:span text:style-name="T1"> </text:span><text:span text:style-name="T2">(28/18) </text:span> ⲛ̅ⲭⲣⲟⲛⲟⲥ ϩⲛ̅ ⲟⲩⲙⲛ̅ⲧϯ ϩⲟ ⲉⲃⲟⲗ <text:line-break/><text:span text:style-name="T1"> </text:span><text:span text:style-name="T2">(28/19) </text:span> ϥⲛⲁⲙⲟⲩⲛ ⲉⲃⲟⲗ ⲁⲛ ⲁⲗⲗⲁ ϥⲛⲁ <text:line-break/><text:span text:style-name="T1"> </text:span><text:span text:style-name="T2">(28/20) </text:span> ϩⲁⲓ̈ⲉ ⲛ̅ⲑⲉ ⲉⲧϥ̅ϣⲟⲟⲡ ⲙ̅ⲙⲟⲥ̣ [ⲛ̅] <text:line-break/><text:span text:style-name="T1"> </text:span><text:span text:style-name="T2">(28/21) </text:span> ϭⲓ ⲡⲉⲕϩⲏⲧ ϥⲛⲁϣⲱⲡⲉ ⲙ̅ⲙ[ⲟϥ] <text:line-break/><text:span text:style-name="T1"> </text:span><text:span text:style-name="T2">(28/22) </text:span> ⲛ̅ϭⲓ ⲡⲉⲕⲃⲓⲟⲥ· ⲟⲩϩⲏⲧ ⲛ̅ⲣⲙ̅ⲛ̣̅[ⲛⲟⲩ] <text:line-break/><text:span text:style-name="T1"> </text:span><text:span text:style-name="T2">(28/23) </text:span> ⲧⲉ ϥⲧⲣⲉⲟⲩⲃⲓⲟⲥ ⲙ̅ⲙⲁⲕ̣ⲁ̣[ⲣⲓⲟⲥ] <text:line-break/><text:span text:style-name="T1"> </text:span><text:span text:style-name="T2">(28/24) </text:span> ϣⲱⲡⲉ· ⲡⲉⲧⲛⲁϣⲟϫ̣[ⲛⲉ ⲛ̅ⲟⲩⲡⲉ] <text:line-break/><text:span text:style-name="T1"> </text:span><text:span text:style-name="T2">(28/25) </text:span> ⲑⲟⲟⲩ ⲉϩⲟⲩⲛ ⲉⲕⲉⲩⲉ̣[ϥϣⲱⲡⲉ ⲙ̅] <text:line-break/><text:span text:style-name="T1"> </text:span><text:span text:style-name="T2">(28/26) </text:span> ⲡϣⲟⲣⲡ̅ ⲛ̅ⲧⲉⲡ̣[ <text:line-break/><text:span text:style-name="T1"> </text:span><text:span text:style-name="T2">(28/27) </text:span> ⲟⲩⲣⲱⲙⲉ ⲛ̅ⲁⲭ〈ⲁ〉ⲣⲓⲥⲧ̣[ⲟⲥ ⲙ̅ⲡⲣ̅ⲧⲣⲉϥ] <text:line-break/><text:span text:style-name="T1"> </text:span><text:span text:style-name="T2">(28/28) </text:span> ⲗⲁϭⲉ ⲉⲣⲟⲕ ⲉⲕⲉⲓⲣⲉ ⲙ̅ⲡ[ⲉⲧⲛⲁⲛⲟⲩϥ·] <text:line-break/><text:span text:style-name="T1"> </text:span><text:span text:style-name="T2">(29/1) </text:span> [ⲙ̅ⲡⲣ̅ϫⲟⲟⲥ ϩⲙ̅ ⲡⲉ]ⲕϩⲏⲧ ϫ[ⲉ] ⲛⲁ <text:line-break/><text:span text:style-name="T1"> </text:span><text:span text:style-name="T2">(29/2) </text:span> [ⲉⲓ ⲉⲩⲙ̅]ⲡ̣ϣ̣[ⲁ ⲉ]ⲩ̣ⲣ̅ⲁⲓⲧⲉⲓ ⲙ̣̅ⲙⲟ ‐ <text:line-break/><text:span text:style-name="T1"> </text:span><text:span text:style-name="T2">(29/3) </text:span> [ⲟⲩ ⲛ̅ⲧⲁⲕ]ϯ ⲛ̣̅[ⲧⲉ]ⲩⲛⲟⲩ ⲙ̅ⲫⲟⲩⲟ ⲙ̅ <text:line-break/><text:span text:style-name="T1"> </text:span><text:span text:style-name="T2">(29/4) </text:span> [ⲡⲉⲛⲧ]ⲁϫⲓⲧ̣ϥ̣̅[·] ⲉⲕⲛⲁⲣ̅ⲭⲣⲁⲥⲑⲁⲓ <text:line-break/><text:span text:style-name="T1"> </text:span><text:span text:style-name="T2">(29/5) </text:span> [ⲛ̅ⲧⲛⲟ]ϭ ⲛ̅ⲟⲩⲥⲓⲁ· ⲉⲕϣⲁϯ ⲛ̅ⲛⲉⲧ <text:line-break/><text:span text:style-name="T1"> </text:span><text:span text:style-name="T2">(29/6) </text:span> [ⲣ̅ ϭⲣⲱϩ] ϩⲛ̅ ⲟⲩⲡⲣⲟⲑⲩⲙⲓⲁ· ⲟⲩⲥⲟ̅ <text:line-break/><text:span text:style-name="T1"> </text:span><text:span text:style-name="T2">(29/7) </text:span> [ⲉϥⲁⲅⲛ]ⲱⲙⲟⲛⲉⲓ ⲉⲣⲓⲡⲓⲑⲉ ⲙ̅ⲙⲟϥ <text:line-break/><text:span text:style-name="T1"> </text:span><text:span text:style-name="T2">(29/8) </text:span> [ⲉⲧ]ⲙ̣̅ⲣ̅ ⲁⲅⲛⲱⲙⲱⲛ· ⲉϥϣⲁⲛⲗⲩ <text:line-break/><text:span text:style-name="T1"> </text:span><text:span text:style-name="T2">(29/9) </text:span> [ⲥⲥⲁ ⲉ]ⲣⲓⲧⲏⲣⲓ ⲙ̅ⲙⲟϥ ⲉⲣⲓⲁⲅⲱⲛⲓ <text:line-break/><text:span text:style-name="T1"> </text:span><text:span text:style-name="T2">(29/10) </text:span> [ⲍ]ⲉ 〈ⲉ〉ϫⲣⲟ ⲉⲣⲱⲙⲉ ⲛⲓⲙ ⲛ̅ϩⲛ ⲧⲙⲛ̅ⲧ <text:line-break/><text:span text:style-name="T1"> </text:span><text:span text:style-name="T2">(29/11) </text:span> [ⲉ]ⲩ̣ⲅⲛⲱⲙⲱⲛ· ⲕⲱ ⲛⲉⲕ ⲙ̅ⲡⲉⲕ <text:line-break/><text:span text:style-name="T1"> </text:span><text:span text:style-name="T2">(29/12) </text:span> [ⲣ]ⲱϣⲉ ⲕⲛⲁϣϫⲓ ⲛⲟⲩⲥ ⲉⲛ ⲉⲓⲙⲏ <text:line-break/><text:span text:style-name="T1"> </text:span><text:span text:style-name="T2">(29/13) </text:span> [ⲧ]ⲓ̣ ⲛⲅ̅ⲙ̅ⲙⲉ ⲛ̅ϣⲟⲣⲡ̅ ϫⲉ ⲙⲛ̅ⲧⲉⲕ〈ϥ〉 <text:line-break/><text:span text:style-name="T1"> </text:span><text:span text:style-name="T2">(29/14) </text:span> ϩⲓ̣ ϩⲱⲃ ⲛⲓⲙ ⲡⲓϣⲁϫⲉ ⲟⲛ ⲡⲉ· ⲙ̅ <text:line-break/><text:span text:style-name="T1"> </text:span><text:span text:style-name="T2">(29/15) </text:span> ⲙⲉⲣⲟⲥ ⲙ̅ⲡⲥⲱⲙⲁ ⲥⲉⲟ ⲛⲉⲧⲡⲱ <text:line-break/><text:span text:style-name="T1"> </text:span><text:span text:style-name="T2">(29/16) </text:span> ⲛ̅ⲛⲉⲧⲣ̅ⲭⲣⲁⲥⲑⲁⲓ ⲙ̅ⲙⲟⲟⲩ ⲉⲛ· <text:line-break/><text:span text:style-name="T1"> </text:span><text:span text:style-name="T2">(29/17) </text:span> ⲛ̣ⲁⲛⲟⲩⲥ ⲉⲣ̅ϩⲩⲡⲏⲣⲉⲧⲉⲓ ⲛ̅ϩⲛ <text:line-break/><text:span text:style-name="T1"> </text:span><text:span text:style-name="T2">(29/18) </text:span> ⲕⲟⲟⲩⲉ ⲛ̅ϩⲟⲩⲟ ⲉⲧⲣⲉϩⲛ̅ⲕⲟⲟⲩⲉ <text:line-break/><text:span text:style-name="T1"> </text:span><text:span text:style-name="T2">(29/19) </text:span> ⲣ̅ϩⲩⲡⲏⲣⲉⲧⲓ ⲙ̅ⲙⲟⲕ· ⲡⲉⲧⲉ ⲡⲛⲟⲩ <text:line-break/><text:span text:style-name="T1"> </text:span><text:span text:style-name="T2">(29/20) </text:span> ⲧⲉ ⲛⲁⲛ̅ⲧϥ̅ ⲉⲛ ⲉⲃⲟⲗ ϩⲛ̅ ⲥⲱⲙⲁ· <text:line-break/><text:span text:style-name="T1"> </text:span><text:span text:style-name="T2">(29/21) </text:span> [ⲙ̅]ⲡⲣ̅ⲧⲣⲉϥⲣ̅ⲃⲁⲣⲉⲓ ⲙ̅ⲙⲟϥ· ⲟⲩ <text:line-break/><text:span text:style-name="T1"> </text:span><text:span text:style-name="T2">(29/22) </text:span> [ⲇ]ⲟⲅⲙⲁ ⲉⲙⲉϥϯ ⲛ̅ⲛⲉⲧⲣ̅ ϭⲣⲱϩ· <text:line-break/><text:span text:style-name="T1"> </text:span><text:span text:style-name="T2">(29/23) </text:span> [ⲟ]ⲩⲙⲟⲛⲟⲛ ⲙ̅ⲡⲣ̅ϫⲡⲟϥ ⲛⲉⲕ <text:line-break/><text:span text:style-name="T1"> </text:span><text:span text:style-name="T2">(29/24) </text:span> [ⲟⲩⲇ]ⲉ ⲙ̣̅[ⲡ]ⲣ̣̅ⲥⲱⲧⲙ̅ ⲉⲣⲟϥ· ⲡⲉⲧϯ <text:line-break/><text:span text:style-name="T1"> </text:span><text:span text:style-name="T2">(29/25) </text:span> [ⲗⲁⲁ]ⲩ [ⲁϫⲛ̅]ϫⲓ ϩⲟ ⲉϥⲣ̅ϩⲩⲃⲣⲓⲍⲉ <text:line-break/><text:span text:style-name="T1"> </text:span><text:span text:style-name="T2">(29/26) </text:span> [ 9+- ]. ⲉⲕϣⲁⲛϥⲓ ⲡⲣⲟ <text:line-break/><text:span text:style-name="T1"> </text:span><text:span text:style-name="T2">(29/27) </text:span> [ⲟⲩϣ ⲛ̅ϩⲛ̅]ⲟ̣ⲣ̣ⲫⲁⲛⲟⲥ ⲕⲛⲁϣⲱ <text:line-break/><text:soft-page-break/><text:span text:style-name="T1"> </text:span><text:span text:style-name="T2">(29/28) </text:span> [ⲡⲉ ⲙ̅ⲡⲓ]ⲱⲧ ⲛ̅ϩⲁϩ ⲛ̅ϣⲏⲣⲉ ⲉⲕⲟ <text:line-break/><text:span text:style-name="T1"> </text:span><text:span text:style-name="T2">(30/1) </text:span> ⲙ̅ⲙ[ⲁ]ⲉ̣ⲓⲛⲟⲩⲧⲉ[· ⲡⲉⲧⲕ̅ⲣ̅ϩⲩⲡⲟⲩⲣ] <text:line-break/><text:span text:style-name="T1"> </text:span><text:span text:style-name="T2">(30/2) </text:span> ⲅⲓ ⲛⲉϥ ⲉⲧⲃⲉ ⲟⲩ[ⲉⲟ]ⲟ̣ⲩ̣ [ⲁⲕⲣ̅ϩⲩ] <text:line-break/><text:span text:style-name="T1"> </text:span><text:span text:style-name="T2">(30/3) </text:span> ⲡⲟⲩⲣⲅⲓ ϩⲁ ⲟⲩⲃⲉ[ⲕⲉ·] ⲉⲕ[ϣⲁⲛϯ ⲙ̅] <text:line-break/><text:span text:style-name="T1"> </text:span><text:span text:style-name="T2">(30/4) </text:span> ⲡⲉⲧ〈ⲧ〉ⲁⲉⲓⲁⲕ ⲛ̅ⲧⲁ̣[.]ⲁⲣⲉ[..ⲛ̅ⲧⲁⲕ] <text:line-break/><text:span text:style-name="T1"> </text:span><text:span text:style-name="T2">(30/5) </text:span> ϯ ⲛ̅ⲟⲩⲣⲱⲙⲉ ⲉⲛ ⲁⲗⲗⲁ ⲛ̣̅[ⲧⲁⲕϯ] <text:line-break/><text:span text:style-name="T1"> </text:span><text:span text:style-name="T2">(30/6) </text:span> ⲛ̅ⲧⲉⲕϩⲏⲇⲟⲛⲏ· ⲙ̅ⲡⲣ̅ϯ [ϭⲱⲛⲧ̅ ⲛ̅] <text:line-break/><text:span text:style-name="T1"> </text:span><text:span text:style-name="T2">(30/7) </text:span> ⲧⲟⲣⲅⲏ ⲛ̅ⲟⲩⲙⲏⲏϣⲉ ⲙ̅[ⲙⲉ ⲧⲉⲛⲟⲩ] <text:line-break/><text:span text:style-name="T1"> </text:span><text:span text:style-name="T2">(30/8) </text:span> ⲉⲩⲡⲉⲧⲉϣϣⲉ ⲉⲧⲣⲉϥ[ⲉ]ⲉ̣ϥ̣ [ⲛ̅ϭⲓ] <text:line-break/><text:span text:style-name="T1"> </text:span><text:span text:style-name="T2">(30/9) </text:span> ⲡⲣⲙ̅ⲙⲁⲟ· ⲛⲁⲛⲟⲩⲥ ⲉⲙⲟⲩ ⲛ̣̅[ϩⲟⲩ] <text:line-break/><text:span text:style-name="T1"> </text:span><text:span text:style-name="T2">(30/10) </text:span> ⲟ ⲉϯ ϩⲗⲁⲥⲧⲛ̅ ⲛ̅ⲧⲯⲩⲭⲏ ⲉⲧⲃ[ⲉ ⲧⲙⲛ̅ⲧ] <text:line-break/><text:span text:style-name="T1"> </text:span><text:span text:style-name="T2">(30/11) </text:span> ⲁⲧⲁⲙⲁϩⲧⲉ ⲛ̅ⲑⲏ· ϫⲟⲟ[ⲥ] ϩⲙ̅ ⲡ[ⲉⲕ] <text:line-break/><text:span text:style-name="T1"> </text:span><text:span text:style-name="T2">(30/12) </text:span> ϩⲏⲧ ϫⲉ ⲧϩⲃ̅ⲥⲱ ⲛ̅ⲧⲉⲕⲯⲩⲭⲏ̣ [ⲧⲉ] <text:line-break/><text:span text:style-name="T1"> </text:span><text:span text:style-name="T2">(30/13) </text:span> ⲡⲥⲱⲙⲁ· ⲁⲣⲏϩⲉ ϭⲉ ⲉⲣⲟϥ ⲉϥ[ⲟⲩ] <text:line-break/><text:span text:style-name="T1"> </text:span><text:span text:style-name="T2">(30/14) </text:span> ⲁⲁⲃ· ⲉϥⲟ ⲛ̅ⲁⲧⲛⲟⲃⲉ· ⲛⲉⲧⲉ ⲧⲯⲩ̣ <text:line-break/><text:span text:style-name="T1"> </text:span><text:span text:style-name="T2">(30/15) </text:span> ⲭⲏ ⲛⲁⲁⲁⲩ ⲉⲥϩⲛ̅ ⲥⲱⲙⲁ· ⲟⲩⲛⲧⲉⲥ <text:line-break/><text:span text:style-name="T1"> </text:span><text:span text:style-name="T2">(30/16) </text:span> ⲥⲉ ⲙ̅ⲙⲛ̅ⲧⲣⲉ ⲉⲥⲃⲏⲕ ⲉϩⲣⲁⲓ̈ ⲉ <text:line-break/><text:span text:style-name="T1"> </text:span><text:span text:style-name="T2">(30/17) </text:span> ⲧⲉⲕⲣⲓⲥⲓⲥ· ϩⲛ̅ⲇⲁⲓⲙⲱⲛ ⲛⲁⲕⲁ <text:line-break/><text:span text:style-name="T1"> </text:span><text:span text:style-name="T2">(30/18) </text:span> ⲑⲁⲣⲧⲟⲥ ϣⲁⲩⲣ̅ⲉⲡⲓⲇⲓⲕⲁⲍⲉ ⲛ̅ⲟⲩ <text:line-break/><text:span text:style-name="T1"> </text:span><text:span text:style-name="T2">(30/19) </text:span> ⲯⲩⲭⲏ ⲉⲥϫⲁϩⲙ̅ ⲟⲩⲯⲩⲭⲏ ⲙ̅ⲡⲓ <text:line-break/><text:span text:style-name="T1"> </text:span><text:span text:style-name="T2">(30/20) </text:span> ⲥⲧⲏ ⲛ̅ⲁⲅⲁⲑⲏ 〈ϩⲛ̅〉ⲇⲁⲓⲙⲱⲛ ⲉⲑⲟⲟⲩ <text:line-break/><text:span text:style-name="T1"> </text:span><text:span text:style-name="T2">(30/21) </text:span> ⲛⲁϣⲣ̅ⲕⲁⲧⲉⲭⲉ ⲙ̅ⲙⲟⲥ ⲉⲛ ϩⲛ̅ ⲧ <text:line-break/><text:span text:style-name="T1"> </text:span><text:span text:style-name="T2">(30/22) </text:span> ϩⲓⲏ ⲙ̅ⲡⲛⲟⲩⲧⲉ· ⲡⲗⲟⲅⲟⲥ ⲙ̅ⲡ[ⲛⲟⲩ] <text:line-break/><text:span text:style-name="T1"> </text:span><text:span text:style-name="T2">(30/23) </text:span> ⲧⲉ ⲙ̅ⲡⲣ̅ⲧⲉⲉϥ ⲛ̅ⲟⲩⲟⲛ ⲛ̣ⲓⲙ ⲛ̣[ⲉⲧ] <text:line-break/><text:span text:style-name="T1"> </text:span><text:span text:style-name="T2">(30/24) </text:span> ϫⲁϩⲙ̅ ⲉⲃⲟⲗ ϩⲓⲧⲟⲟⲧϥ̅ [ⲙ̅]ⲡ̣ⲉ[ⲟⲟⲩ] <text:line-break/><text:span text:style-name="T1"> </text:span><text:span text:style-name="T2">(30/25) </text:span> ⲟⲩⲱⲣϫ̅ ⲛⲁⲩ ⲁⲛ ⲡⲉ ⲉ[ⲧⲣⲉ]ⲩ̣[ⲥⲱⲧⲙ̅] <text:line-break/><text:span text:style-name="T1"> </text:span><text:span text:style-name="T2">(30/26) </text:span> ⲉⲧⲃⲉ ⲡⲛⲟⲩⲧⲉ· ⲟ̣[ⲩⲕⲓⲛⲇⲩⲛⲟⲥ ⲛ̅] <text:line-break/><text:span text:style-name="T1"> </text:span><text:span text:style-name="T2">(30/27) </text:span> ⲕⲟⲩⲉⲓ ⲉⲛ ⲡⲉ ⲉⲧⲣⲉⲛ[ϫⲱ ⲛ̅ⲧⲁⲗⲏ] <text:line-break/><text:span text:style-name="T1"> </text:span><text:span text:style-name="T2">(30/28) </text:span> ⲑⲓⲁ ⲉⲧⲃⲉ ⲡⲛⲟⲩⲧⲉ ⲙ̅[ⲡⲣ̅ϣⲁϫⲉ ⲛ̅] <text:line-break/><text:span text:style-name="T1"> </text:span><text:span text:style-name="T2">(31/1) </text:span> [ⲗⲁⲁⲩ ⲉⲧⲃⲉ ⲡⲛ]ⲟⲩⲧⲉ ϩⲁⲧ̣[ϩⲏ] <text:line-break/><text:span text:style-name="T1"> </text:span><text:span text:style-name="T2">(31/2) </text:span> [ⲙ̅ⲡⲁⲧⲕ̅ⲥ]ⲁⲃⲟ ⲛ̣̅ⲧⲟⲟⲧϥ̅ ⲙ̅ⲡ̣ⲛ[ⲟⲩ] <text:line-break/><text:span text:style-name="T1"> </text:span><text:span text:style-name="T2">(31/3) </text:span> [ⲧⲉ· ⲙ̅ⲡⲣ̅]ϣⲁϫⲉ̣ ⲙⲛ̅ ⲟⲩⲁⲧⲛⲟⲩ[ⲧⲉ] <text:line-break/><text:span text:style-name="T1"> </text:span><text:span text:style-name="T2">(31/4) </text:span> [ϩⲁⲡⲣⲁ ⲙ̅]ⲡⲛⲟ̣ⲩ̣ⲧⲉ ⲉϣⲱⲡⲉ ⲕ[ϫⲁ] <text:line-break/><text:span text:style-name="T1"> </text:span><text:span text:style-name="T2">(31/5) </text:span> [ϩⲙ̅ ⲉⲧⲃ]ⲉ ⲛⲉϩⲃⲏⲩⲉ ⲉⲧϫⲁϩⲙ̣̅ <text:line-break/><text:span text:style-name="T1"> </text:span><text:span text:style-name="T2">(31/6) </text:span> [ⲙ̅ⲡⲣ̅]ϣ̣ⲁϫⲉ ϩⲁⲡⲣⲁ ⲙ̅ⲡⲛⲟⲩⲧⲉ̣[·] <text:line-break/><text:span text:style-name="T1"> </text:span><text:span text:style-name="T2">(31/7) </text:span> [ⲡϣⲁϫ]ⲉ ⲙ̅ⲙⲏⲉ ϩⲁⲡⲣⲁ ⲙ̅ⲡⲛⲟ̣[ⲩ] <text:line-break/><text:span text:style-name="T1"> </text:span><text:span text:style-name="T2">(31/8) </text:span> ⲧⲉ [ⲡ]ϣⲁϫⲉ ⲙ̅ⲡⲛⲟⲩⲧⲉ ⲡⲉ· ϣ[ⲁ] <text:line-break/><text:span text:style-name="T1"> </text:span><text:span text:style-name="T2">(31/9) </text:span> ϫⲉ ⲉ̣ⲡⲗⲟⲅⲟⲥ ϩⲁⲡⲣⲁ ⲙ̅ⲡⲛⲟⲩ <text:line-break/><text:span text:style-name="T1"> </text:span><text:span text:style-name="T2">(31/10) </text:span> ⲧⲉ ϩⲱⲥ ⲉⲕϫⲱ ⲙ̅ⲙⲟϥ ϩⲁⲧⲛ̅ ⲡⲛⲟⲩ <text:line-break/><text:span text:style-name="T1"> </text:span><text:span text:style-name="T2">(31/11) </text:span> [ⲧ]ⲉ· ⲉⲣϣⲁⲛⲡⲉⲕϩⲏⲧ ⲧⲱⲧ ⲛ̅ϩ <text:line-break/><text:span text:style-name="T1"> </text:span><text:span text:style-name="T2">(31/12) </text:span> ϣ̣ⲟⲣⲡ̅ ϫⲉ ⲁⲕⲣ̅ ⲙⲁⲉⲓⲛⲟⲩⲧⲉ· <text:line-break/><text:span text:style-name="T1"> </text:span><text:span text:style-name="T2">(31/13) </text:span> [ⲧ]ⲟⲧⲉ ⲛⲉⲧⲕ̅ⲟⲩⲁϣⲟⲩ ϣⲁϫⲉ <text:line-break/><text:span text:style-name="T1"> </text:span><text:span text:style-name="T2">(31/14) </text:span> ⲉⲣⲟⲟⲩ ϩⲁⲡⲣⲁ ⲙ̅ⲡⲛⲟⲩⲧⲉ· ⲛⲉⲕ <text:line-break/><text:span text:style-name="T1"> </text:span><text:span text:style-name="T2">(31/15) </text:span> ϩⲃⲏⲩⲉ ⲙ̅ⲙⲁⲉⲓⲛⲟⲩⲧⲉ ⲙⲁⲣⲟⲩ <text:line-break/><text:span text:style-name="T1"> </text:span><text:span text:style-name="T2">(31/16) </text:span> ⲥⲱⲕ ϩⲏⲧϥ̅ ⲛ̅ϣⲁϫⲉ ⲛⲓⲙ ϩⲁⲡⲣⲁ <text:line-break/><text:span text:style-name="T1"> </text:span><text:span text:style-name="T2">(31/17) </text:span> ⲙ̅ⲡⲛⲟⲩⲧⲉ· ⲙ̅ⲡⲣ̅ⲟⲩⲱϣ ⲉϣⲁ <text:line-break/><text:span text:style-name="T1"> </text:span><text:span text:style-name="T2">(31/18) </text:span> ϫⲉ ϩⲁⲧⲛ̅ ⲟⲩⲙⲏⲏϣⲉ ϩⲁⲡⲣⲁ ⲙ̅ <text:line-break/><text:soft-page-break/><text:span text:style-name="T1"> </text:span><text:span text:style-name="T2">(31/19) </text:span> ⲡⲛⲟⲩⲧⲉ· ⲟⲩϣⲁϫⲉ ⲉⲧⲃⲉ ⲡⲛⲟⲩ <text:line-break/><text:span text:style-name="T1"> </text:span><text:span text:style-name="T2">(31/20) </text:span> ⲧⲉ ϯ ⲥⲟ ⲉⲣⲟϥ ⲉⲧⲃⲉ ⲟⲩⲯⲩⲭⲏ· ϥ̅ <text:line-break/><text:span text:style-name="T1"> </text:span><text:span text:style-name="T2">(31/21) </text:span> ⲥⲟⲧⲡ̅ ⲁϯ ⲟⲩⲯⲩⲭⲏ ⲉϩⲟⲩⲟ ⲉⲛⲉϫ <text:line-break/><text:span text:style-name="T1"> </text:span><text:span text:style-name="T2">(31/22) </text:span> ⲟⲩϣⲁϫⲉ ⲉⲃⲟⲗ ⲉⲡϫⲓⲛϫⲏ ϩⲁⲡⲣⲁ <text:line-break/><text:span text:style-name="T1"> </text:span><text:span text:style-name="T2">(31/23) </text:span> ⲙ̅ⲡⲛⲟⲩⲧⲉ ⲕϫⲉ ⲟⲩⲱ ⲙⲉⲛ ⲙ̅ⲡⲥⲱ <text:line-break/><text:span text:style-name="T1"> </text:span><text:span text:style-name="T2">(31/24) </text:span> ⲙⲁ ⲙ̅ⲡⲣⲙ̣̅ⲛ̅ⲛⲟⲩⲧⲉ· ⲕⲛⲁϣⲣ̅ ϫⲟ <text:line-break/><text:span text:style-name="T1"> </text:span><text:span text:style-name="T2">(31/25) </text:span> ⲉⲓⲥ ⲇⲉ ⲁ̣ⲛ ⲉⲡⲉϥϣⲁϫⲉ· ⲡⲕⲉⲙⲟⲩ <text:line-break/><text:span text:style-name="T1"> </text:span><text:span text:style-name="T2">(31/26) </text:span> ⲉⲓ ϩⲱϥ ϣ̣[ⲁ]ϥⲣ̅ⲁⲣⲭⲉⲓ ⲉⲡⲥⲱⲙⲁ ⲙ̅ <text:line-break/><text:span text:style-name="T1"> </text:span><text:span text:style-name="T2">(31/27) </text:span> [ⲡⲥ]ⲟ̣[ⲫⲟ]ⲥ̣ ⲡ̣ⲕⲉⲧⲩⲣⲁⲛⲟⲥ ⲣ̅ⲁⲣⲭⲓ <text:line-break/><text:span text:style-name="T1"> </text:span><text:span text:style-name="T2">(31/28) </text:span> [ⲉⲣⲟϥ] ⲟⲩⲁⲉⲉⲧϥ̅· ⲉⲣϣⲁⲛⲟⲩⲧⲩ <text:line-break/><text:span text:style-name="T1"> </text:span><text:span text:style-name="T2">(31/29) </text:span> [ⲣⲁⲛⲟⲥ] <text:line-break/><text:span text:style-name="T1"> </text:span><text:span text:style-name="T2">(32/1) </text:span> [ⲁ]ⲡ̣[ⲉⲓ]ⲗⲉⲓ ⲛⲉⲕ [ⲧⲟ]ⲧ̣[ⲉ ⲛ̅ϩⲟⲩⲟ ⲉⲣⲓ] <text:line-break/><text:span text:style-name="T1"> </text:span><text:span text:style-name="T2">(32/2) </text:span> [ⲡ]ⲙⲉⲉⲩ ⲙ̅ⲡⲛⲟ[ⲩ]ⲧ̣ⲉ· ⲡ̣[ⲉⲧϣⲁϫⲉ] <text:line-break/><text:span text:style-name="T1"> </text:span><text:span text:style-name="T2">(32/3) </text:span> [ⲙ̅]ⲡⲗⲟⲅⲟⲥ ⲙ̅ⲡⲛ̣ⲟⲩⲧⲉ [ⲉⲛⲉⲧ] <text:line-break/><text:span text:style-name="T1"> </text:span><text:span text:style-name="T2">(32/4) </text:span> [ⲉ]ϣϣⲉ ⲉⲛ ⲡⲉⲉ[ⲓ] ⲡⲉ ⲡ̣[ⲉⲡⲣⲟⲇⲟ] <text:line-break/><text:span text:style-name="T1"> </text:span><text:span text:style-name="T2">(32/5) </text:span> ⲧ̣ⲏⲥ ⲙ̅ⲡⲛⲟⲩⲧⲉ· ⲛⲁⲛ[ⲟⲩⲥ ⲉⲧⲣⲉ] <text:line-break/><text:span text:style-name="T1"> </text:span><text:span text:style-name="T2">(32/6) </text:span> ⲕⲁⲣⲱⲕ ⲉⲡⲗⲟⲅⲟⲥ ⲙ̅ⲡⲛ[ⲟⲩⲧⲉ] <text:line-break/><text:span text:style-name="T1"> </text:span><text:span text:style-name="T2">(32/7) </text:span> ⲏ ⲉⲧⲣⲉⲕϫⲟⲟⲥ ϩⲛ̅ ⲟⲩⲙ̣[ⲛ̅ⲧⲡⲣⲟ] <text:line-break/><text:span text:style-name="T1"> </text:span><text:span text:style-name="T2">(32/8) </text:span> ⲡⲉⲧⲏⲥ· ⲡⲉⲧϫⲱ ⲛ̅ϩⲛ̅ϭⲟⲗ̣ [ϩ]ⲁⲡⲣ̣[ⲁ] <text:line-break/><text:span text:style-name="T1"> </text:span><text:span text:style-name="T2">(32/9) </text:span> ⲙ̅ⲡⲛⲟⲩⲧⲉ· ⲡⲉⲉⲓ ⲉϥϫⲓ ϭ[ⲟ]ⲗ ⲉ <text:line-break/><text:span text:style-name="T1"> </text:span><text:span text:style-name="T2">(32/10) </text:span> ⲡⲛⲟⲩⲧⲉ ⲟⲩⲣⲱⲙⲉ ⲉⲙⲛ̅ⲧⲁϥ̣ <text:line-break/><text:span text:style-name="T1"> </text:span><text:span text:style-name="T2">(32/11) </text:span> ⲗⲁⲁⲩⲉ ⲙ̅ⲙⲏⲉ ⲉϫⲱ ϩⲁⲡⲣⲁ ⲙ̅[ⲡⲛⲟⲩ] <text:line-break/><text:span text:style-name="T1"> </text:span><text:span text:style-name="T2">(32/12) </text:span> ⲧⲉ ϥⲟ ⲛ̅ϫⲁⲉⲓⲉ ⲉⲡⲛⲟⲩⲧⲉ· [ⲙⲛ̅] <text:line-break/><text:span text:style-name="T1"> </text:span><text:span text:style-name="T2">(32/13) </text:span> ϭⲟⲙ ⲛⲅ̅ⲥⲟⲩⲛ ⲡⲛⲟⲩⲧⲉ ⲉⲕⲣ̅[ⲥⲉ] <text:line-break/><text:span text:style-name="T1"> </text:span><text:span text:style-name="T2">(32/14) </text:span> ⲃⲉⲥⲑⲁⲓ ⲛⲉϥ ⲉⲛ· ⲟⲩⲣⲱⲙⲉ ⲉϥ <text:line-break/><text:span text:style-name="T1"> </text:span><text:span text:style-name="T2">(32/15) </text:span> ϫⲓ ⲟⲩⲉ ⲛ̅ϭⲟⲛⲥ̅ ϥⲛⲁϣⲣ̅ⲥⲉⲃⲉⲥⲑⲉ <text:line-break/><text:span text:style-name="T1"> </text:span><text:span text:style-name="T2">(32/16) </text:span> ⲁⲛ ⲉⲡⲛⲟⲩⲧⲉ· 1̅6vacat̅16 ⲧⲁⲣⲭⲏ ⲛ̅ⲧⲙ̅ⲛⲧ <text:line-break/><text:span text:style-name="T1"> </text:span><text:span text:style-name="T2">(32/17) </text:span> ⲛⲟⲩⲧⲉ ⲧⲉ ⲧⲙⲛ̅ⲧⲙⲁⲉⲓⲣⲱⲙⲉ· <text:line-break/><text:span text:style-name="T1"> </text:span><text:span text:style-name="T2">(32/18) </text:span> ⲡⲉⲧϥⲓ ⲙ̅ⲡⲣⲟⲟⲩϣ ⲛ̅ⲣⲱⲙⲉ ⲉϥ <text:line-break/><text:span text:style-name="T1"> </text:span><text:span text:style-name="T2">(32/19) </text:span> ϣⲗⲏⲗ ϩⲁⲣⲟⲟⲩ ⲧⲏⲣⲟⲩ ⲧⲉⲉⲓ ⲧⲉ <text:line-break/><text:span text:style-name="T1"> </text:span><text:span text:style-name="T2">(32/20) </text:span> ⲧⲁⲗⲏⲑⲓⲁ ⲙ̅ⲡⲛⲟⲩⲧⲉ· ⲡⲁⲡⲛⲟⲩ̣ <text:line-break/><text:span text:style-name="T1"> </text:span><text:span text:style-name="T2">(32/21) </text:span> ⲧⲉ ⲙⲉⲛ ⲡⲉ ⲁⲧⲁⲛϩⲉ ⲡⲉⲧϥ̅ⲟⲩⲁ <text:line-break/><text:span text:style-name="T1"> </text:span><text:span text:style-name="T2">(32/22) </text:span> ϣϥ̅· ⲡⲁⲡⲣⲙ̅ⲛ̅ⲛⲟⲩⲧⲉ ϩⲱⲱϥ̣ <text:line-break/><text:span text:style-name="T1"> </text:span><text:span text:style-name="T2">(32/23) </text:span> ⲡⲉ ⲁϣⲗⲏⲗ ⲉⲡⲛⲟⲩⲧⲉ ⲉⲧⲁⲛ <text:line-break/><text:span text:style-name="T1"> </text:span><text:span text:style-name="T2">(32/24) </text:span> ϩⲉ ⲟⲩⲟⲛ ⲛⲓⲙ· ϩⲟⲧⲁⲛ ⲉⲕϣⲁⲛ <text:line-break/><text:span text:style-name="T1"> </text:span><text:span text:style-name="T2">(32/25) </text:span> ϣⲗⲏⲗ ⲉⲧⲃⲉ ⲟⲩϩⲱⲃ ⲛϥ̣̅ϣⲱⲡⲉ <text:line-break/><text:span text:style-name="T1"> </text:span><text:span text:style-name="T2">(32/26) </text:span> ⲛⲁⲕ ⲉⲃⲟⲗ ϩⲓⲧⲛ̅ ⲡⲛⲟ̣[ⲩ]ⲧ̣ⲉ ⲧⲟⲧ̣[ⲉ] <text:line-break/><text:span text:style-name="T1"> </text:span><text:span text:style-name="T2">(32/27) </text:span> ϫⲟⲟⲥ ϩⲙ̅ ⲡⲉⲕϩⲏⲧ ϫⲉ ⲟ̣[ⲩⲛ̅ⲧⲉⲕ] <text:line-break/><text:span text:style-name="T1"> </text:span><text:span text:style-name="T2">(33/1) </text:span> [ 12+- ]..[ <text:line-break/><text:span text:style-name="T1"> </text:span><text:span text:style-name="T2">(33/2) </text:span> [..ⲟⲩ]ⲣ̣ⲱ̣[ⲙ]ⲉ̣ [ⲉ]ϥ̣ⲙ̅ⲡϣⲁ ⲙ̣̅ⲡⲛⲟ̣ⲩ̣ <text:line-break/><text:span text:style-name="T1"> </text:span><text:span text:style-name="T2">(33/3) </text:span> ⲧⲉ̣ [ⲡⲉ]ⲉ̣ⲓ̣ ⲡⲉ ⲡ̣ⲛⲟⲩⲧⲉ ⲉⲧϩⲛ̅ ⲛ̅ <text:line-break/><text:span text:style-name="T1"> </text:span><text:span text:style-name="T2">(33/4) </text:span> ⲣ̅ⲣ̣[ⲱⲙ]ⲉ̣· ⲁⲩⲱ ⲡϣⲏⲣⲉ ⲙ̅ⲡⲛⲟⲩ <text:line-break/><text:span text:style-name="T1"> </text:span><text:span text:style-name="T2">(33/5) </text:span> ⲧⲉ [ⲡ]ⲉ̣· ϥϣⲟⲟⲡ ⲙⲉⲛ ⲛ̅ϭⲓ ⲡⲛⲟϭ <text:line-break/><text:span text:style-name="T1"> </text:span><text:span text:style-name="T2">(33/6) </text:span> ⲁⲩⲱ ϥ̣ϣⲟⲟⲡ ⲛ̅ϭⲓ ⲡⲉⲧϩⲏⲛ ⲉ <text:line-break/><text:span text:style-name="T1"> </text:span><text:span text:style-name="T2">(33/7) </text:span> ϩⲟⲩⲛ ⲉⲡⲛⲟϭ· ⲛⲁⲛⲟⲩⲥ ⲉⲧⲣⲉ <text:line-break/><text:span text:style-name="T1"> </text:span><text:span text:style-name="T2">(33/8) </text:span> ⲡ̣ⲣⲱⲙⲉ ϣⲱⲡⲉ ⲉⲙⲛ̅ⲧⲉϥ ϩⲛⲉ <text:line-break/><text:span text:style-name="T1"> </text:span><text:span text:style-name="T2">(33/9) </text:span> ⲉⲩ· ⲛ̅ϩⲟⲩⲟ ⲉⲟⲩⲛⲧⲉϥ ϩⲁϩ ⲛ̅ϩⲛⲉ <text:line-break/><text:soft-page-break/><text:span text:style-name="T1"> </text:span><text:span text:style-name="T2">(33/10) </text:span> ⲉⲩ ⲉⲛϥ̅ϯ ⲉⲛ 〈ⲛ̅〉ⲛⲉⲧⲣ̅ ϭⲣⲱϩ· ⲛ̅ⲧⲟⲕ <text:line-break/><text:span text:style-name="T1"> </text:span><text:span text:style-name="T2">(33/11) </text:span> ϩⲱⲱⲕ ⲉⲕϣⲁⲧⲱⲃϩ̅ ⲙ̅ⲡⲛⲟⲩⲧⲉ <text:line-break/><text:span text:style-name="T1"> </text:span><text:span text:style-name="T2">(33/12) </text:span> ϥ̣ⲛⲁϯ ⲛⲉⲕ ⲉⲛ· ϩⲙ̅ ⲡⲉⲕϩⲏⲧ ⲧⲏ <text:line-break/><text:span text:style-name="T1"> </text:span><text:span text:style-name="T2">(33/13) </text:span> ⲣϥ̅· ⲉⲕϣⲁⲛϯ ⲙ̅ⲡⲉⲕⲟⲉⲓⲕ ⲛ̅ <text:line-break/><text:span text:style-name="T1"> </text:span><text:span text:style-name="T2">(33/14) </text:span> ⲛⲉⲧϩⲕⲁⲉⲓⲧ· ⲡϯ ⲙⲉⲛ ⲟⲩⲕⲟⲩⲓ <text:line-break/><text:span text:style-name="T1"> </text:span><text:span text:style-name="T2">(33/15) </text:span> ⲡⲉ· ⲧⲉⲡⲣⲟⲑⲩⲙⲓⲁ ⲇⲉ ⲟⲩⲛⲟϭ <text:line-break/><text:span text:style-name="T1"> </text:span><text:span text:style-name="T2">(33/16) </text:span> ⲧⲉ ϩⲁϩⲧⲛ̅ ⲡⲛⲟⲩⲧⲉ· ⲡⲉⲧⲙⲉ <text:line-break/><text:span text:style-name="T1"> </text:span><text:span text:style-name="T2">(33/17) </text:span> ⲉⲩ ϫⲉ ⲙⲛ̅ ⲗⲁⲁⲩ ϣⲟⲟⲡ ⲛ̅ⲁϩⲣⲛ̅ <text:line-break/><text:span text:style-name="T1"> </text:span><text:span text:style-name="T2">(33/18) </text:span> ⲡⲛⲟⲩⲧⲉ· ⲡⲉⲉⲓ ϭⲁϫⲃ̅ ⲉⲛ ⲉⲡⲛⲟⲩ <text:line-break/><text:span text:style-name="T1"> </text:span><text:span text:style-name="T2">(33/19) </text:span> ⲧⲉ· ⲡⲉⲧⲧⲟⲛⲧⲛ̅ ⲛ̅ⲡⲉϥϩⲏⲧ’ ⲉ <text:line-break/><text:span text:style-name="T1"> </text:span><text:span text:style-name="T2">(33/20) </text:span> ⲡⲛⲟⲩⲧⲉ ⲕⲁⲧⲁ ⲧⲉϥϭⲟⲙ· ⲡⲉⲓ̈ <text:line-break/><text:span text:style-name="T1"> </text:span><text:span text:style-name="T2">(33/21) </text:span> ⲡ̣ⲉ ⲉⲧⲣ̅ⲧⲓⲙⲁ ⲙ̅ⲡⲛⲟⲩⲧⲉ ⲙ̅ⲡϣⲁ· <text:line-break/><text:span text:style-name="T1"> </text:span><text:span text:style-name="T2">(33/22) </text:span> ⲡ̣ⲛⲟⲩⲧⲉ ⲙⲉⲛ ϥⲣ̅ ⲭⲣⲓⲁ ⲉⲛ ⲛ̅ⲗⲁ <text:line-break/><text:span text:style-name="T1"> </text:span><text:span text:style-name="T2">(33/23) </text:span> [ⲁ]ⲩ· ϥⲣⲁϣⲉ̣ ⲇⲉ ⲉϫⲛ̅ ⲛⲉⲧϯ ⲛ̅ⲛⲉⲧ <text:line-break/><text:span text:style-name="T1"> </text:span><text:span text:style-name="T2">(33/24) </text:span> ⲣ̅ ϭⲣⲱϩ ⲙ̅ⲡⲓⲥⲧⲟⲥ ⲙⲉⲩϫⲉ ϩⲁϩ <text:line-break/><text:span text:style-name="T1"> </text:span><text:span text:style-name="T2">(33/25) </text:span> ⲛ̣̅ϣⲁϫⲉ· ⲛ̣ⲉⲩϩⲃⲏⲩⲉ ⲇⲉ ⲛⲁϣⲱ <text:line-break/><text:span text:style-name="T1"> </text:span><text:span text:style-name="T2">(33/26) </text:span> [ⲟⲩ·] ⲟ̣[ⲩ]ⲡ̣ⲓⲥⲧⲟⲥ ⲙ̅ⲙⲁⲉⲓϫⲓ ⲥⲃⲱ <text:line-break/><text:span text:style-name="T1"> </text:span><text:span text:style-name="T2">(33/27) </text:span> [ⲡ]ⲉ̣ⲉⲓ ⲡⲉ ⲡⲉⲣⲅⲁⲧⲏⲥ ⲛ̅ⲧⲁⲗⲏⲑⲓ <text:line-break/><text:span text:style-name="T1"> </text:span><text:span text:style-name="T2">(33/28) </text:span> ⲁ <text:line-break/><text:span text:style-name="T1"> </text:span><text:span text:style-name="T2">(34/1) </text:span> [ϩⲁⲣⲙ]ⲟ̣ⲍⲉ...[ ⲙ̅ⲡⲉⲣⲓ] <text:line-break/><text:span text:style-name="T1"> </text:span><text:span text:style-name="T2">(34/2) </text:span> ⲥ̣ⲧⲁⲥⲓⲥ ϩⲓⲛⲁ ϫ̅ⲛ̅.[...]..[..ⲉⲕ] <text:line-break/><text:span text:style-name="T1"> </text:span><text:span text:style-name="T2">(34/3) </text:span> ⲧⲙ̅ϫⲓ ⲗⲁⲁⲩⲉ ⲛ̅ϭⲟ̣ⲛⲥ̅ ⲕⲛⲁⲣ̣̅ [ϩⲟ]ⲧⲉ <text:line-break/><text:span text:style-name="T1"> </text:span><text:span text:style-name="T2">(34/4) </text:span> ⲉⲛ ϩⲏⲧϥ̅ ⲛ̅ⲗⲁⲁⲩ· ⲡⲧⲩⲣⲁⲛⲛ̣[ⲟⲥ] ϥⲛⲁ <text:line-break/><text:span text:style-name="T1"> </text:span><text:span text:style-name="T2">(34/5) </text:span> ϣϥⲓ ⲁⲛ ⲙ̅ⲙⲁⲩ ⲛ̅ⲧⲙ̅ⲛ̅ⲧ̅ⲣⲙ̣̅ⲙⲁⲟ· <text:line-break/><text:span text:style-name="T1"> </text:span><text:span text:style-name="T2">(34/6) </text:span> ⲡⲉⲧⲉϣϣⲉ ⲉⲁⲁϥ ⲁⲣⲓϥ ϩⲙ̣̅ ⲡ̣ⲉⲕ <text:line-break/><text:span text:style-name="T1"> </text:span><text:span text:style-name="T2">(34/7) </text:span> ⲟⲩⲱϣⲉ· ⲡⲉⲧⲉϣϣⲉ ⲉⲛ ⲉⲉϥ ⲙ̅ <text:line-break/><text:span text:style-name="T1"> </text:span><text:span text:style-name="T2">(34/8) </text:span> ⲡⲣ̅ⲁⲁϥ ⲛ̅ⲗⲁⲁⲩ ⲛ̅ⲥⲙⲟⲧ· ⲉⲣⲓϩⲩ <text:line-break/><text:span text:style-name="T1"> </text:span><text:span text:style-name="T2">(34/9) </text:span> ⲡⲟⲥⲭⲟⲩ ⲛ̅ϩⲱⲃ ⲛⲓⲙ ⲉϩⲟⲩ[ⲟ ⲉ] <text:line-break/><text:span text:style-name="T1"> </text:span><text:span text:style-name="T2">(34/10) </text:span> ⲧⲣⲉⲕϫⲟⲟⲥ ϫⲉ ⲁⲛⲟⲕ ⲟⲩⲥⲟⲫⲟ̣[ⲥ·] <text:line-break/><text:span text:style-name="T1"> </text:span><text:span text:style-name="T2">(34/11) </text:span> ⲡⲉⲧⲕ̅ⲉⲓⲣⲉ ⲙ̅ⲙⲟϥ ⲕⲁⲗⲱⲥ ϫⲟⲟ̣[ⲥ] <text:line-break/><text:span text:style-name="T1"> </text:span><text:span text:style-name="T2">(34/12) </text:span> ϩⲙ̅ ⲡⲉⲕϩⲏⲧ ϫⲉ ⲡⲛⲟⲩⲧⲉ ⲡ[ⲉ] <text:line-break/><text:span text:style-name="T1"> </text:span><text:span text:style-name="T2">(34/13) </text:span> ⲧ{ⲕ̅}ⲉⲓⲣⲉ ⲙ̅ⲙⲟϥ· ⲙⲛ̅ ⲗⲁⲁⲩ ⲛ̅ⲣⲱ̣ <text:line-break/><text:span text:style-name="T1"> </text:span><text:span text:style-name="T2">(34/14) </text:span> ⲙⲉ ⲉϥⲥⲟⲙ〈ⲥ̅〉 ⲉⲡⲓⲧⲛ̅ ⲉϫⲛ̅ ⲡⲕⲁϩ <text:line-break/><text:span text:style-name="T1"> </text:span><text:span text:style-name="T2">(34/15) </text:span> ⲁⲩⲱ ⲉϫⲛ̅ ϩⲛ̅ⲧⲣⲁⲡⲉⲍⲁ ⲉϥⲟ ⲛ̅ⲥⲟ <text:line-break/><text:span text:style-name="T1"> </text:span><text:span text:style-name="T2">(34/16) </text:span> ⲫⲟⲥ· ⲡⲫⲓⲗⲟⲥⲟⲫⲟⲥ ⲉⲧⲟ ⲛ̅ⲥⲱ̣ <text:line-break/><text:span text:style-name="T1"> </text:span><text:span text:style-name="T2">(34/17) </text:span> ⲙⲁ ⲙ̅ⲡⲁⲛⲃⲟⲗ· ⲛ̅ⲧⲟϥ ⲉⲛ ⲡⲉ ⲉ <text:line-break/><text:span text:style-name="T1"> </text:span><text:span text:style-name="T2">(34/18) </text:span> ⲧⲉϣϣⲉ ⲉⲧⲁⲉⲓⲟϥ ⲁⲗⲗⲁ ⲫⲓⲗⲟ <text:line-break/><text:span text:style-name="T1"> </text:span><text:span text:style-name="T2">(34/19) </text:span> ⲥⲟⲫⲟⲥ ⲕⲁⲧⲁ ⲡⲣⲱⲙⲉ ⲉⲧⲛ̅ⲡⲥⲁʹ262 <text:line-break/><text:span text:style-name="T1"> </text:span><text:span text:style-name="T2">(34/20) </text:span> ϩⲟⲩⲛ· ⲁⲣⲏϩⲉ ⲉⲣⲟⲕ ⲉϫⲓ ϭⲟⲗ· ⲟⲩⲛ <text:line-break/><text:span text:style-name="T1"> </text:span><text:span text:style-name="T2">(34/21) </text:span> ⲡⲉⲧⲣ̅ⲁⲡⲁⲧⲁ· ⲁⲩⲱ ⲟⲩⲛ ⲡⲉⲧⲟⲩ̣ <text:line-break/><text:span text:style-name="T1"> </text:span><text:span text:style-name="T2">(34/22) </text:span> ⲣ̅ⲁⲡⲁⲧⲁ ⲙ̅ⲙⲟϥ· ⲛⲓⲙ ⲡⲉ ⲡⲛ[ⲟⲩ] <text:line-break/><text:span text:style-name="T1"> </text:span><text:span text:style-name="T2">(34/23) </text:span> ⲧⲉ ⲙ̅ⲙⲉ· ⲙ̅ⲙⲉ ⲇⲉ ϫⲉ ⲛⲓⲙ ⲡⲉⲧ̣[ⲣ̅] <text:line-break/><text:span text:style-name="T1"> </text:span><text:span text:style-name="T2">(34/24) </text:span> ⲛⲟⲉⲓ ϩⲣⲁⲓ̈ ⲛ̅ϩⲏⲧⲕ̅ ⲟⲩⲣⲱⲙⲉ ⲛ̅[ⲁ] <text:line-break/><text:span text:style-name="T1"> </text:span><text:span text:style-name="T2">(34/25) </text:span> ⲅⲁⲑⲟⲥ ⲡⲉⲉⲓ ⲡⲉ ⲡϩⲱⲃ ⲉⲧⲛⲁⲛⲟ̣[ⲩϥ] <text:line-break/><text:span text:style-name="T1"> </text:span><text:span text:style-name="T2">(34/26) </text:span> ⲙ̅ⲡⲛⲟⲩⲧⲉ· ϩⲛ̅ⲧⲁⲗ[ⲁ]ⲓ̣ⲡⲱⲣⲟ[ⲥ] <text:line-break/><text:span text:style-name="T1"> </text:span><text:span text:style-name="T2">(34/27) </text:span> ⲛⲉ →ⲛ←ⲉⲉⲓ ⲉⲧⲟⲩϫⲉ ⲟⲩⲁ ⲉⲡ̣ⲗ[ⲟⲅⲟⲥ] <text:line-break/><text:span text:style-name="T1"> </text:span><text:span text:style-name="T2">(34/28) </text:span> ⲉⲧⲃⲏⲧⲟⲩ ⲡⲙⲟⲩ ⲛⲁϣⲧⲉⲕ[ⲟ ⲉⲛ] </text:p>
      <text:p text:style-name="P3">( codex XII ) The Gospel of Truth</text:p>
      <text:p text:style-name="P2"><text:span text:style-name="T1"> </text:span><text:span text:style-name="T2">(53/19) </text:span> [.....]..[ <text:line-break/><text:span text:style-name="T1"> </text:span><text:span text:style-name="T2">(53/20) </text:span> [ⲁⲩⲱ] ⲛⲉⲧⲥⲱⲧⲙ̅ ⲉⲣⲟ̣[ϥ <text:line-break/><text:span text:style-name="T1"> </text:span><text:span text:style-name="T2">(53/21) </text:span> [ⲛⲉϥ]ϯ ⲛⲁⲩ ⲛ̅ϯϯⲡⲉ [ⲙⲛ̅ ⲡⲓⲥⲧⲟⲓ ⲛ̅] <text:line-break/><text:span text:style-name="T1"> </text:span><text:span text:style-name="T2">(53/22) </text:span> [ⲟⲩⲥ]ⲙⲟⲧ ⲛ̅ⲧⲁϥ ⲡϣ̣[ⲏⲣⲉ ⲙ̅ⲙⲉⲣⲓⲧ] <text:line-break/><text:span text:style-name="T1"> </text:span><text:span text:style-name="T2">(53/23) </text:span> [ⲁϥⲟ]ⲩⲱⲛϩ̅ ⲛⲁⲩ ⲉⲃⲟⲗ̣ [ⲁϥⲧⲁⲙⲟⲟⲩ] <text:line-break/><text:span text:style-name="T1"> </text:span><text:span text:style-name="T2">(53/24) </text:span> [ⲉⲡⲉⲓ]ⲱⲧ’ ⲡⲓⲁⲧϣⲁϫ̣ [ⲙ̅ⲙⲟϥ ⲉ] <text:line-break/><text:span text:style-name="T1"> </text:span><text:span text:style-name="T2">(53/25) </text:span> [ⲁϥⲛⲓϥ]ⲉ ⲙ̅ⲡⲉϥⲙⲉⲉⲩⲉ ⲉ̣[ϩⲣⲁⲓ̈ ⲉⲣⲟ] <text:line-break/><text:span text:style-name="T1"> </text:span><text:span text:style-name="T2">(53/26) </text:span> [ⲟⲩ ⲁϥⲉⲓⲣ]ⲉ ⲙ̅ⲡⲉϥⲟⲩⲱ̣[ϣ· ⲁϩⲁϩ ϭⲉ] <text:line-break/><text:span text:style-name="T1"> </text:span><text:span text:style-name="T2">(53/27) </text:span> [ϫⲓ ⲙ̅ⲡⲟⲩ]ⲟⲉⲓⲛ ⲛⲉϥϩⲛ̅ ⲡⲥ[ⲙⲟⲧ ⲛ̅ⲥⲁ] <text:line-break/><text:span text:style-name="T1"> </text:span><text:span text:style-name="T2">(53/28) </text:span> [ⲣⲝ̅ ⲛⲉ]ⲩϩⲟ ⲛ̅ϣⲙ̅ⲙⲟ ⲡⲉ [ⲉⲣⲟⲟⲩ] <text:line-break/><text:span text:style-name="T1"> </text:span><text:span text:style-name="T2">(53/29) </text:span> [4-5] ⲉⲛⲉϥⲕⲧⲁⲉⲓⲧ ⲙ̅.[ <text:line-break/><text:span text:style-name="T1"> </text:span><text:span text:style-name="T2">(54/18) </text:span> (lines 1-18 lacking) <text:line-break/><text:span text:style-name="T1"> </text:span><text:span text:style-name="T2">(54/19) </text:span> [ⲙⲣ̅ⲣⲉ ⲉⲧϭⲗ]ⲙ̣̅ⲗⲟⲙⲧ ⲁϥⲡⲟⲣ̣[ⲕⲟⲩ] <text:line-break/><text:span text:style-name="T1"> </text:span><text:span text:style-name="T2">(54/20) </text:span> [ 9+- ] ⲛ̅ⲃⲣ̅ⲣⲉ ⲁϥⲥⲟⲟ̣[ϩⲉ ⲉ] <text:line-break/><text:span text:style-name="T1"> </text:span><text:span text:style-name="T2">(54/21) </text:span> [ϩⲣⲁⲓ̈ ⲇⲉ ⲛ̅ⲛⲁⲉ]ⲓ̣ ⲛ̅ⲧⲁⲩⲥⲗⲁⲁⲧⲉ ⲟ̣[ⲩⲙⲟ] <text:line-break/><text:span text:style-name="T1"> </text:span><text:span text:style-name="T2">(54/22) </text:span> [ⲉⲓⲧ ⲁϥϣⲱⲡ]ⲉ ⲛ̅ⲛⲁⲉⲓ ⲉⲧⲥⲟⲣ̅[̅ⲙ̅· ⲟⲩ] <text:line-break/><text:span text:style-name="T1"> </text:span><text:span text:style-name="T2">(54/23) </text:span> [ⲥⲟⲟⲩⲛ ⲁϥϣ]ⲱⲡⲉ ⲛ̅ⲛⲁⲉⲓ ⲉⲧ̣[ⲟ ⲛ̅ⲁⲧ] <text:line-break/><text:span text:style-name="T1"> </text:span><text:span text:style-name="T2">(54/24) </text:span> [ⲥⲟⲟⲩⲛ· ⲟ]ⲩⲙⲛ̅ⲧⲁⲧⲙⲟⲩ ⲁⲥϣ̣[ⲱⲡⲉ] <text:line-break/><text:span text:style-name="T1"> </text:span><text:span text:style-name="T2">(54/25) </text:span> [ⲛ̅ⲛⲁⲉⲓ ⲉⲧⲙ]ⲟⲟⲩⲧ ⲡⲁⲉⲓ ⲡ[ⲉ ⲡϣⲱⲥ] <text:line-break/><text:span text:style-name="T1"> </text:span><text:span text:style-name="T2">(54/26) </text:span> [ⲉϥⲕⲱ ⲉϩⲣ]ⲁ̣ⲓ̣̈ ⲙ̅ⲡⲓⲯ̅ⲧⲁⲉⲓⲟ̣[ⲩ ⲙⲛ̅ ⲯⲓⲥ] <text:line-break/><text:span text:style-name="T1"> </text:span><text:span text:style-name="T2">(54/27) </text:span> [ⲛ̅ⲉⲥⲟⲟⲩ] ⲛ̣ⲁⲉⲓ ⲉⲧⲉ ⲙ̅ⲡⲟⲩⲥⲱ[ⲣⲙ̅ ⲁϥ] <text:line-break/><text:span text:style-name="T1"> </text:span><text:span text:style-name="T2">(54/28) </text:span> [ϣⲓⲛⲉ ⲛ̅ⲥ]ⲁ ⲡⲁⲓ̈ ⲛ̅ⲧⲁϥⲥⲱⲣⲙ̣̅ [ <text:line-break/><text:span text:style-name="T1"> </text:span><text:span text:style-name="T2">(57/1) </text:span> [ϥⲟⲩⲟⲛϩ̅ ⲉⲃⲟⲗ] ϩⲙ̅ ⲙⲁ ⲛ[ⲓⲙ ⲉϥϣⲁⲛ] <text:line-break/><text:span text:style-name="T1"> </text:span><text:span text:style-name="T2">(57/2) </text:span> [ⲧⲱϩ ⲉϯϩⲩⲗ]ⲏ̣ ⲧ̣ⲏⲣⲥ̅ ⲡ̣[ⲓⲥϯⲛⲟⲩϥⲉ] <text:line-break/><text:span text:style-name="T1"> </text:span><text:span text:style-name="T2">(57/3) </text:span> [ⲛ̅ⲧⲁϥ ϥϯ] ⲙ̅ⲙⲟϥ ⲉⲡⲟ̣[ⲩⲟⲉⲓⲛ ⲁⲩ] <text:line-break/><text:span text:style-name="T1"> </text:span><text:span text:style-name="T2">(57/4) </text:span> [ⲱ ϩⲛ̅ ⲧⲉϥⲙⲛ̅]ⲧϩⲁⲣϣϩⲏⲧʹ261 [ϥϫⲟⲥⲉ] <text:line-break/><text:span text:style-name="T1"> </text:span><text:span text:style-name="T2">(57/5) </text:span> [ⲉϫⲛ̅ ⲥⲙⲟⲧ ⲛ]ⲓⲙ· ⲡⲙⲁⲁϫ[ⲉ ⲅⲁⲣ ⲁⲛ] <text:line-break/><text:span text:style-name="T1"> </text:span><text:span text:style-name="T2">(57/6) </text:span> [ⲡⲉ ⲉϣⲁϥϣⲱ]ⲗⲙ̅ ⲁⲗⲗⲁ ⲡ[ⲡ̅ⲛ̅ⲁ̅ ⲡⲉⲧ] <text:line-break/><text:span text:style-name="T1"> </text:span><text:span text:style-name="T2">(57/7) </text:span> [ϣⲱⲗⲙ̅ ⲉⲣⲟ]ϥ̣ ⲙ̅ⲡⲣⲏⲧⲉ ⲉⲧ̣[ⲉⲡⲡ̅ⲛ̅ⲁ̅] <text:line-break/><text:span text:style-name="T1"> </text:span><text:span text:style-name="T2">(57/8) </text:span> [ⲥⲱⲕ ⲉⲃⲟⲗ ⲙ̅]ⲡⲓⲥϯⲛⲟⲩϥⲉ [ⲉⲣⲟϥ ⲁⲩ] <text:line-break/><text:span text:style-name="T1"> </text:span><text:span text:style-name="T2">(57/9) </text:span> [ⲱ ⲡⲡ̅ⲛ̅ⲁ̅ ⲡⲉ]ⲧϯ ⲙ̅ⲧⲟⲛ ⲛⲁ̣[ϥ <text:line-break/><text:span text:style-name="T1"> </text:span><text:span text:style-name="T2">(57/10) </text:span> [....ⲙ̅]ⲙ̣ⲟϥ ⲉϫⲱϥ.[......] <text:line-break/><text:span text:style-name="T1"> </text:span><text:span text:style-name="T2">(57/11) </text:span> [....ⲉⲃⲟⲗ]ϩⲛ̅ ⲛⲓⲥϯⲛⲟ[ⲩϥⲉ ⲛ̅ϣ] <text:line-break/><text:span text:style-name="T1"> </text:span><text:span text:style-name="T2">(57/12) </text:span> [ⲣ̅ⲡ̅ ⲉⲧⲁⲣ̅ϣ̅ ⲟ]ⲩⲉⲃⲟⲗ ϩⲛ̅ ⲛⲓ[ⲥϯⲛⲟⲩϥⲉ] <text:line-break/><text:span text:style-name="T1"> </text:span><text:span text:style-name="T2">(57/13) </text:span> [ⲅⲁⲣ ⲡⲉ· ⲟⲩ]ⲯⲩⲭⲓⲕⲟⲛ ⲙ̅[ⲡⲗⲁⲥⲙⲁ] <text:line-break/><text:span text:style-name="T1"> </text:span><text:span text:style-name="T2">(57/14) </text:span> [ 10+- ]. ⲉⲣⲉⲡⲙⲉ[ⲣⲓⲥⲙⲟⲥ] <text:line-break/><text:span text:style-name="T1"> </text:span><text:span text:style-name="T2">(57/15) </text:span> [ 11+- ]ⲙ̣ ⲡⲙⲁ .[ <text:line-break/><text:span text:style-name="T1"> </text:span><text:span text:style-name="T2">(57/16) </text:span> [ 12+- ⲉ]ⲧⲃⲉ [ⲡⲁⲓ̈ ⲁϥⲉⲓ ⲛ̅] <text:line-break/><text:span text:style-name="T1"> </text:span><text:span text:style-name="T2">(57/17) </text:span> [ϭⲓ ⲡⲛⲁϩⲧⲉ ⲁϥⲃⲱⲗ] ⲉⲃⲟⲗ ⲙ̣̅[ⲡⲓⲙⲉ] <text:line-break/><text:span text:style-name="T1"> </text:span><text:span text:style-name="T2">(57/18) </text:span> [ⲡⲓⲥⲙⲟⲥ ⲁⲩⲱ ⲁϥⲉ]ⲓ ⲉⲡϫⲱ[ⲕ ⲉⲃⲟⲗ] <text:line-break/><text:span text:style-name="T1"> </text:span><text:span text:style-name="T2">(57/19) </text:span> [ⲉⲧϩⲏⲙ ϫⲉ]ⲕ[ⲁⲁⲥ ⲛ̅]ⲛⲉϥϣⲱ[ⲡⲉ] <text:line-break/><text:span text:style-name="T1"> </text:span><text:span text:style-name="T2">(57/20) </text:span> [ⲉϥⲥⲱⲧ] ⲉⲉⲓ ⲛ̣[ⲁϥ ⲛ̅]ϭⲓ ⲡⲓⲁⲣⲟϣ [ⲁⲩ] <text:line-break/><text:span text:style-name="T1"> </text:span><text:span text:style-name="T2">(57/21) </text:span> [ⲱ ϥⲛ]ⲁ̣ⲃⲱⲗ ϩ[ⲙ̅ ⲡ]ⲧⲱⲧ ⲛ̣̅[ϩⲏⲧ ⲉⲧ] <text:line-break/><text:span text:style-name="T1"> </text:span><text:span text:style-name="T2">(57/22) </text:span> [ϫⲏⲕ]ⲡⲁⲓ̈ ⲡ[ⲉ ⲡ]ϣⲁϫ̣[ⲉ ⲙ̅ⲡϣ̅ⲙ̅] <text:line-break/><text:span text:style-name="T1"> </text:span><text:span text:style-name="T2">(57/23) </text:span> [ⲛⲟⲩ]ϥ̣ⲉ ⲉⲛⲧ[ⲁⲩ]ⲧ̣ⲁϣ̣[ⲉ ⲟⲉⲓϣ ⲙ̅] <text:line-break/><text:span text:style-name="T1"> </text:span><text:span text:style-name="T2">(57/24) </text:span> [ⲙⲟϥ ⲡⲟ]ⲩϫⲁⲉ̣[ⲓ ⲡ]ⲉ ⲛ̅ⲛⲁⲉ[ⲓ ⲉⲧⲟⲩ] <text:line-break/><text:soft-page-break/><text:span text:style-name="T1"> </text:span><text:span text:style-name="T2">(57/25) </text:span> [ⲙⲟⲩⲧⲉ] ⲉⲣⲟⲟ[ⲩ ⲉⲩ]ⲥⲟⲙ̅ⲧ̅ ⲉ̣[ⲃⲟⲗ ϩⲏ] <text:line-break/><text:span text:style-name="T1"> </text:span><text:span text:style-name="T2">(57/26) </text:span> [ⲧ̅ϥ̅ ⲙ̅ⲡⲟ]ⲩ̣ϫⲁ[ⲉⲓ ⲉ]ⲧⲉⲟⲩ̣.[ <text:line-break/><text:span text:style-name="T1"> </text:span><text:span text:style-name="T2">(57/27) </text:span> [...ⲟⲩⲟ]ⲛϩ [ⲡⲁ]ⲉⲓ ⲉⲧϫ[ <text:line-break/><text:span text:style-name="T1"> </text:span><text:span text:style-name="T2">(57/28) </text:span> [.....] ⲉⲩⲥⲟⲙ̅ⲧ̅ ⲉⲃⲟ[ⲗ <text:line-break/><text:span text:style-name="T1"> </text:span><text:span text:style-name="T2">(57/29) </text:span> ϫⲱ[ <text:line-break/><text:span text:style-name="T1"> </text:span><text:span text:style-name="T2">(58/1) </text:span> [ⲡⲉ ⲡⲟⲩ]ⲟⲉⲓⲛ ⲡⲁⲓ̈ [ⲉⲧⲉ ⲙ̅ⲛ̅ ϩⲁⲓⲃⲉⲥ] <text:line-break/><text:span text:style-name="T1"> </text:span><text:span text:style-name="T2">(58/2) </text:span> [ⲛ̅ϩⲏⲧ]ϥ̣̅ ϫ̅ⲛ̅ ⲙ̅ⲙ[ⲟⲛ ⲉϣϫⲉ ϣⲁϥ] <text:line-break/><text:span text:style-name="T1"> </text:span><text:span text:style-name="T2">(58/3) </text:span> [ⲉⲓ ⲛ̅]ϭ̣ⲓ ⲡⲓⲡⲗⲏⲣⲱ̣[ⲙⲁ· ⲁⲩⲱ ⲙ̅ⲡⲉ] <text:line-break/><text:span text:style-name="T1"> </text:span><text:span text:style-name="T2">(58/4) </text:span> [ⲡⲓ]ϣⲧⲁ ϣⲱⲡⲉ [ⲉⲃⲟⲗ ϩⲓⲧⲟⲟⲧ̅ⲥ̅] <text:line-break/><text:span text:style-name="T1"> </text:span><text:span text:style-name="T2">(58/5) </text:span> [ⲛ̅ϯ]ⲡⲗⲁⲛⲏ· ⲁⲩⲱ ⲁ[ⲥϣⲱⲡⲉ ⲉⲧⲃⲏ] <text:line-break/><text:span text:style-name="T1"> </text:span><text:span text:style-name="T2">(58/6) </text:span> [ⲏⲧ̅ⲥ̅ ⲛ%7]ϯⲙⲛ̅ⲧⲛⲟ̣[ⲩⲧⲉ ⲙ̅ⲡⲉⲓⲱⲧ ⲛ̅] <text:line-break/><text:span text:style-name="T1"> </text:span><text:span text:style-name="T2">(58/7) </text:span> [ⲁⲧ]ϣⲓⲧⲥ ⲁϥϯ ⲛ̅ⲟ[ⲩⲟⲉⲓϣ ⲙ̅ⲡⲓϣⲧⲁ] <text:line-break/><text:span text:style-name="T1"> </text:span><text:span text:style-name="T2">(58/8) </text:span> [ⲕⲁⲓ]ⲧⲟⲓ ⲛⲉϥϣⲟⲟⲡ̣ [ⲛ̅ϭⲓ ⲙ̅ⲛ̅ ⲗⲁⲁⲩ] <text:line-break/><text:span text:style-name="T1"> </text:span><text:span text:style-name="T2">(58/9) </text:span> [ⲉⲧ]ⲛ̣ⲁϣⲧⲁⲩⲟ ⲙ̅ⲡ[ⲣⲏⲧⲉ ⲛ̅ⲉⲓ ⲙ̅ⲡⲓ] <text:line-break/><text:span text:style-name="T1"> </text:span><text:span text:style-name="T2">(58/10) </text:span> [ⲁⲧϫⲱ]ϩ̅ⲙ̅ ⲁⲗⲗⲁ ⲟⲩ[ <text:line-break/><text:span text:style-name="T1"> </text:span><text:span text:style-name="T2">(58/11) </text:span> [ⲡⲃⲁ]ⲑⲟⲥ ⲙ̅ⲡⲉⲓⲱ[ⲧ <text:line-break/><text:span text:style-name="T1"> </text:span><text:span text:style-name="T2">(58/12) </text:span> [ⲙⲉⲉⲩ]ⲉ ϩⲟⲗⲱⲥ ϩⲁⲧ[ⲟⲟⲧ <text:line-break/><text:span text:style-name="T1"> </text:span><text:span text:style-name="T2">(58/13) </text:span> [...]ϥϣⲱⲡⲉ· ⲉ[ <text:line-break/><text:span text:style-name="T1"> </text:span><text:span text:style-name="T2">(58/14) </text:span> [...]ⲙⲉⲧ ⲉⲧⲉ ⲡ̣[ <text:line-break/><text:span text:style-name="T1"> </text:span><text:span text:style-name="T2">(58/15) </text:span> [...] ⲛ̅ⲧⲉ ⲡⲧ.[ <text:line-break/><text:span text:style-name="T1"> </text:span><text:span text:style-name="T2">(58/16) </text:span> [....] ⲡϭⲓ̣[ⲛⲉ <text:line-break/><text:span text:style-name="T1"> </text:span><text:span text:style-name="T2">(58/17) </text:span> [.]ⲟ̣ⲩⲛ ⲡⲉ̣[ⲧⲥⲧⲟ ⲉⲃⲟⲗ ⲅⲁⲣ ⲥⲉ] <text:line-break/><text:span text:style-name="T1"> </text:span><text:span text:style-name="T2">(58/18) </text:span> [ⲙⲟ]ⲩⲧⲉ ⲉⲣⲟ[ϥ ϫⲉ ⲟⲩⲙⲉⲧⲁⲛⲟⲓⲁ] <text:line-break/><text:span text:style-name="T1"> </text:span><text:span text:style-name="T2">(58/19) </text:span> ⲉ̣ⲧⲃⲉ ⲡⲁⲓ̈ ⲁ̣[ⲁⲫⲑ]ⲁ̣ⲣ̣[ⲥⲓⲁ ⲡⲱⲧ ⲛ̅ⲥⲁ] <text:line-break/><text:span text:style-name="T1"> </text:span><text:span text:style-name="T2">(58/20) </text:span> ⲡⲛⲟⲃⲉ ϩⲓ̣[ⲛⲁ] ϫ̣ⲉⲕ[ⲁⲁⲥ ⲉϥⲉϣⲱ] <text:line-break/><text:span text:style-name="T1"> </text:span><text:span text:style-name="T2">(58/21) </text:span> [ⲡⲉ] ⲛ̅ϭⲓ ⲟⲩ[ⲧⲁⲗ]ϭⲟ· ⲡ.[ <text:line-break/><text:span text:style-name="T1"> </text:span><text:span text:style-name="T2">(58/22) </text:span> [....]. ⲛ̅.[.]ϣⲱⲡⲉ [...ⲡⲁⲓ̈] <text:line-break/><text:span text:style-name="T1"> </text:span><text:span text:style-name="T2">(58/23) </text:span> [ⲡⲕⲱ] ⲉⲃⲟⲗ̣ [ⲡⲉ] ϩⲓⲧⲟⲟ̣[ⲧ̅ϥ̅ ⲙ̅ⲡⲗⲟ] <text:line-break/><text:span text:style-name="T1"> </text:span><text:span text:style-name="T2">(58/24) </text:span> [ⲅ]ⲟ̣ⲥ ⲛ̣̅ⲧⲉ [ⲡⲓ]ⲡⲗⲏ[ⲣⲱⲙⲁ· ⲡⲁⲓ̈] <text:line-break/><text:span text:style-name="T1"> </text:span><text:span text:style-name="T2">(58/25) </text:span> [ⲅⲁ]ⲣ ⲉϣⲁϥ[ⲡ]ⲱⲧ ⲉⲡ[ⲉⲓ̈ⲙⲁ ⲉⲧⲉ] <text:line-break/><text:span text:style-name="T1"> </text:span><text:span text:style-name="T2">(58/26) </text:span> [ⲡ]ϣⲱⲛⲉ ⲙ̣̅[ⲙ]ⲁⲩ ⲉ[ⲃⲟⲗ ϫⲉ ϥϯ ⲛ̅] <text:line-break/><text:span text:style-name="T1"> </text:span><text:span text:style-name="T2">(58/27) </text:span> [ⲧ]ⲟⲟⲧ̅ϥ̅ ⲙ[..]ⲗ̣ⲓ̣.[ <text:line-break/><text:span text:style-name="T1"> </text:span><text:span text:style-name="T2">(58/28) </text:span> [ⲡⲓ]ϣⲧⲁ· ⲉⲃⲟⲗ ϫⲉ ⲡ[ⲉⲧⲣ̅ ϣⲧⲁ] <text:line-break/><text:span text:style-name="T1"> </text:span><text:span text:style-name="T2">(58/29) </text:span> [ϥ]ϯ ⲛ̅ⲧⲟⲟⲧ̅ϥ̅ ⲧⲁⲓ̣̈ ⲧ[ⲉ ⲑⲉ ⲙ̅ⲡⲓⲡⲗⲏ] <text:line-break/><text:span text:style-name="T1"> </text:span><text:span text:style-name="T2">(58/30) </text:span> [ⲣⲱⲙⲁ] <text:line-break/><text:span text:style-name="T1"> </text:span><text:span text:style-name="T2">(59/17) </text:span> (lines 1-17 lacking) <text:line-break/><text:span text:style-name="T1"> </text:span><text:span text:style-name="T2">(59/18) </text:span> [ⲡⲁⲓ̈ ϩⲛ̅ ⲧⲟⲩⲙⲏⲧⲉ] ⲁ̣ⲩ̣ϣⲁ̣[ϫⲉ ⲉ] <text:line-break/><text:span text:style-name="T1"> </text:span><text:span text:style-name="T2">(59/19) </text:span> [ⲡⲭ̅ⲥ̅ ϫⲉⲕⲁⲁⲥ] ⲥ̣ⲉ̣[ⲛ]ⲁ̣ϫⲓ ⲛ̅ⲟ[ⲩⲥⲧⲟ] <text:line-break/><text:span text:style-name="T1"> </text:span><text:span text:style-name="T2">(59/20) </text:span> [ⲛ̅ϭⲓ ⲛⲁ]ⲓ̈ ⲉⲧϣ̣ⲧ̅ⲣ̅ⲧⲱⲣ ⲁⲩⲱ ⲛ̣̅[ⲧⲟ] <text:line-break/><text:span text:style-name="T1"> </text:span><text:span text:style-name="T2">(59/21) </text:span> [ⲟⲧ̅ϥ̅ ⲛ̅ⲥ]ⲉϫⲓ ⲙ̅ⲡⲓⲧⲱϩ̅ⲥ̅· ⲡ[ⲓⲧⲱ] <text:line-break/><text:span text:style-name="T1"> </text:span><text:span text:style-name="T2">(59/22) </text:span> [ϩ̅ⲥ̅ ⲅⲁⲣ]ⲡ̣ⲉⲡⲛⲁⲉ ⲛ̅ⲧⲉ ⲡⲉⲓ̣ⲱ̣[ⲧ] <text:line-break/><text:span text:style-name="T1"> </text:span><text:span text:style-name="T2">(59/23) </text:span> [ⲉⲁϥ]ⲛⲁⲉ ϭⲉ ⲛⲁⲩ ⲁⲩϫⲓ ⲙ̅ⲡ[ⲓⲧⲱ] <text:line-break/><text:span text:style-name="T1"> </text:span><text:span text:style-name="T2">(59/24) </text:span> [ϩ̅ⲥ̅ ⲡⲁ]ⲉⲓ ⲡⲉ ⲁⲩϫ̣[ⲱⲕ] ⲉ̣ⲃ̣[ⲟⲗ· ⲛⲓⲥ] <text:line-break/><text:span text:style-name="T1"> </text:span><text:span text:style-name="T2">(59/25) </text:span> [ⲕⲉⲩⲟ]ⲥ ⲅⲁⲣ ⲉⲧⲙϣ[ⲁⲯⲧⲁϩ] <text:line-break/><text:span text:style-name="T1"> </text:span><text:span text:style-name="T2">(59/26) </text:span> [ⲥⲟⲩ ϩⲟ]ⲧ̣ⲁⲛ ⲅⲁⲣ ⲉϥ̣[ϣ]ⲁⲛ[ⲃⲱⲗ ⲉ] <text:line-break/><text:span text:style-name="T1"> </text:span><text:span text:style-name="T2">(59/27) </text:span> [ⲃⲟⲗ ⲛ̅ϭⲓ] ⲡⲓⲧⲱϩ̣ⲥ̣̅ ⲁϥϣ̣[ <text:line-break/><text:span text:style-name="T1"> </text:span><text:span text:style-name="T2">(59/28) </text:span> [ϣⲟⲩ]ⲉ̣ⲓⲧ· ⲧⲗⲟⲉⲓϭⲉ [ⲉⲧⲣⲉϥⲣ̅] <text:line-break/><text:soft-page-break/><text:span text:style-name="T1"> </text:span><text:span text:style-name="T2">(59/29) </text:span> [ⲛ̅ⲟⲩⲭ]ⲣ̣ⲓⲁ ⲡⲃⲱⲗ ⲉ[ⲃⲟⲗ ⲙ̅ⲡⲓ] <text:line-break/><text:span text:style-name="T1"> </text:span><text:span text:style-name="T2">(59/30) </text:span> [ⲧⲱϩ̅ⲥ̅] ⲧⲉ ϣⲁϥⲕⲁ[ⲧⲉⲭⲉ <text:line-break/><text:span text:style-name="T1"> </text:span><text:span text:style-name="T2">(60/17) </text:span> [.]ϣ[ <text:line-break/><text:span text:style-name="T1"> </text:span><text:span text:style-name="T2">(60/18) </text:span> [.]ⲛ̣ ⲉⲡⲉⲓ̣ⲇ̣[ⲏ ⲉⲩϩ̅ⲙ̅ ⲡⲃⲁⲑⲟⲥ ⲙ̅] <text:line-break/><text:span text:style-name="T1"> </text:span><text:span text:style-name="T2">(60/19) </text:span> [ⲡ]ⲉϥⲙⲉⲉⲩⲉ ⲡ̣ⲗ̣ⲟ̣ⲅⲟ̣[ⲥ ⲇⲉ ⲛ̅ⲧⲁϥ] <text:line-break/><text:span text:style-name="T1"> </text:span><text:span text:style-name="T2">(60/20) </text:span> [ⲉ]ⲓ ⲁϥⲟⲩⲟⲛϩⲟⲩ ⲉⲃⲟⲗ̣ [ⲡⲛⲟⲩⲥ ⲛ̅] <text:line-break/><text:span text:style-name="T1"> </text:span><text:span text:style-name="T2">(60/21) </text:span> ⲧ̣ⲉ ⲡⲗⲟⲅⲟⲥ ⲉⲧϣⲁ[ϫⲉ ⲁⲛ ϫⲓⲛ] <text:line-break/><text:span text:style-name="T1"> </text:span><text:span text:style-name="T2">(60/22) </text:span> [ⲙ̅ⲡ]ⲉϩⲟⲟⲩ ⲉⲧⲉⲛⲉϥϭ̣ⲉ[ⲉⲧ ⲉⲩⲙⲟⲩ] <text:line-break/><text:span text:style-name="T1"> </text:span><text:span text:style-name="T2">(60/23) </text:span> [ⲧⲉ ⲉⲣⲟϥ] ϫⲉ̣ ⲙ̣[ⲉ]ⲉⲩⲉ ⲉⲡⲉ[ⲓⲇⲏ ⲉϥ] <text:line-break/><text:span text:style-name="T1"> </text:span><text:span text:style-name="T2">(60/24) </text:span> [ϭⲱ ⲛ̅]ϩⲏ[ⲧϥ̅] ⲉⲙⲡⲁⲧ̅ϥ̅[ⲟⲩⲱⲛϩ] <text:line-break/><text:span text:style-name="T1"> </text:span><text:span text:style-name="T2">(60/25) </text:span> [ⲉⲃⲟ]ⲗ ϥⲛⲁ̣ϣⲱⲡⲉ ⲇ[ⲉ ⲉⲧⲣⲉϥⲟⲩ] <text:line-break/><text:span text:style-name="T1"> </text:span><text:span text:style-name="T2">(60/26) </text:span> [ⲱ]ⲛ̣̅ϩ ⲉⲃ̣ⲟⲗ ϩⲟⲧⲁⲛ̣ [ⲉϥϣⲁⲛⲉⲩ] <text:line-break/><text:span text:style-name="T1"> </text:span><text:span text:style-name="T2">(60/27) </text:span> [ⲇⲟⲕⲉⲓ] ⲛ̅ϭⲓ ⲡⲟⲩⲱϣ [ⲙ̅ⲡⲉⲧ̅ϥ̅] <text:line-break/><text:span text:style-name="T1"> </text:span><text:span text:style-name="T2">(60/28) </text:span> [ⲟⲩⲱϣ]ⲉ ⲡⲓⲟⲩⲱϣ̣ [ⲡⲉⲧ̅ϥ̅ⲙⲟ] <text:line-break/><text:span text:style-name="T1"> </text:span><text:span text:style-name="T2">(60/29) </text:span> [ⲧ̅ⲛ̅ ⲙ̅]ⲡ̣ⲉϥϩⲏⲧ ⲧⲏ[ⲣ̅ϥ̅ ⲛ̅ϩⲏⲧ̅ϥ̅ <text:line-break/><text:span text:style-name="T1"> </text:span><text:span text:style-name="T2">(60/30) </text:span> [ⲛ̅ϭⲓ ⲡⲉ]ⲓⲱⲧ ⲁⲩⲱ ⲡ[ⲉⲧ̅ϥ̅ⲉⲩⲇⲟⲕⲉⲓ] </text:p>
      <text:p text:style-name="P2"/>
      <text:p text:style-name="P3">( codex XII ) fragments</text:p>
      <text:p text:style-name="P2"><text:span text:style-name="T1"> </text:span><text:span text:style-name="T2">(1/6) </text:span> (1ⲁ) [ ].[ <text:line-break/><text:span text:style-name="T1"> </text:span><text:span text:style-name="T2">(1/7) </text:span> (1ⲁ) [ ]ⲉⲩ̣[ <text:line-break/><text:span text:style-name="T1"> </text:span><text:span text:style-name="T2">(1/8) </text:span> (1ⲁ) [ ]ⲙ̅.[ <text:line-break/><text:span text:style-name="T1"> </text:span><text:span text:style-name="T2">(1/9) </text:span> (1ⲁ) [ ]ⲛ.[..]ⲏⲣⲉ ⲉ.[ <text:line-break/><text:span text:style-name="T1"> </text:span><text:span text:style-name="T2">(1/10) </text:span> (1ⲁ) [ ]ⲙ̅ⲙⲟⲛ ⲛ̅ⲑⲉ ⲉⲧⲉϣ‐ <text:line-break/><text:span text:style-name="T1"> </text:span><text:span text:style-name="T2">(1/11) </text:span> (1ⲁ) [ϣⲉ ⲛ]ⲉⲛⲉⲣⲏⲩ ⲁⲗⲗⲁ <text:line-break/><text:span text:style-name="T1"> </text:span><text:span text:style-name="T2">(1/12) </text:span> (1ⲁ) [ ⲟ]ⲩⲙⲏⲏϣⲉ ⲉϫⲓ <text:line-break/><text:span text:style-name="T1"> </text:span><text:span text:style-name="T2">(1/13) </text:span> (1ⲁ) [ ]ⲛ ϣⲁⲩⲥⲉϫⲉ ⲕⲁⲕⲱⲥ <text:line-break/><text:span text:style-name="T1"> </text:span><text:span text:style-name="T2">(1/14) </text:span> (1ⲁ) [ ]ⲱⲛ̅ϩ̅ ⲉⲧ̅ⲙ̅ⲛ̅ⲧⲃⲟⲟ‐ <text:line-break/><text:span text:style-name="T1"> </text:span><text:span text:style-name="T2">(1/15) </text:span> (1ⲁ) [ⲛⲉ ]ⲟⲩϩ ⲉⲃ̣ⲟⲗ ⲛ̅ϯⲙ̅ⲛ̅ⲧ̅ <text:line-break/><text:span text:style-name="T1"> </text:span><text:span text:style-name="T2">(1/16) </text:span> (1ⲁ) [ ⲣ̅ ϩ]ⲱ̣ⲃ ⲉⲛⲡⲉⲑⲟⲟⲩ ⲉ <text:line-break/><text:span text:style-name="T1"> </text:span><text:span text:style-name="T2">(1/17) </text:span> (1ⲁ) [ ]ⲉⲛⲁⲅⲁⲑⲟⲛ· ⲛ̅ⲥⲉ <text:line-break/><text:span text:style-name="T1"> </text:span><text:span text:style-name="T2">(1/18) </text:span> (1ⲁ) [ ⲣ̅ϩ]ⲱⲃ ⲉⲛⲉⲧⲉ ⲛⲟⲩⲟⲩ <text:line-break/><text:span text:style-name="T1"> </text:span><text:span text:style-name="T2">(1/19) </text:span> (1ⲁ) [ ]ⲛ̣ϣ̅ⲙ̅ⲙⲟⲉⲓ ⲟⲩⲛ ϩⲉ̅ <text:line-break/><text:span text:style-name="T1"> </text:span><text:span text:style-name="T2">(1/20) </text:span> (1ⲁ) [ ]ⲣ̅ ϩⲱⲃ ⲉⲛⲉⲧⲉ ⲛⲟⲩ‐ <text:line-break/><text:span text:style-name="T1"> </text:span><text:span text:style-name="T2">(1/21) </text:span> (1ⲁ) [ⲟⲩ ]ⲛ̅ϩⲉⲛϩⲃⲏⲩⲉ ⲉⲛ.[ <text:line-break/><text:span text:style-name="T1"> </text:span><text:span text:style-name="T2">(1/22) </text:span> (1ⲁ) [ ⲁⲛⲟ]ⲛ ϩⲱⲱⲛ ⲉⲛⲣ̅ ϩⲱ̣[ⲃ <text:line-break/><text:span text:style-name="T1"> </text:span><text:span text:style-name="T2">(1/23) </text:span> (1ⲁ) [ ϩⲃⲏ]ⲩⲉ ⲛ̅ⲛⲉⲧ̅ⲙ̅ⲙⲁ̣[ⲩ <text:line-break/><text:span text:style-name="T1"> </text:span><text:span text:style-name="T2">(1/24) </text:span> (1ⲁ) [ ϩⲉⲛϩⲃ]ⲏⲩⲉ ⲉⲩϩⲟⲟⲩ̣[ <text:line-break/><text:span text:style-name="T1"> </text:span><text:span text:style-name="T2">(1/25) </text:span> (1ⲁ) [ ]ⲉⲩ ⲡⲉⲧ̅ⲛ̅ⲛⲁⲉ[ <text:line-break/><text:span text:style-name="T1"> </text:span><text:span text:style-name="T2">(1/26) </text:span> (1ⲁ) [ ⲛ]ⲉϩⲃⲏⲩ→ⲉ← ⲉⲧⲉ̣[ <text:line-break/><text:span text:style-name="T1"> </text:span><text:span text:style-name="T2">(1/27) </text:span> (1ⲁ) [ ]ⲛ̣ⲓ ⲡⲉⲧⲛ[ <text:line-break/><text:span text:style-name="T1"> </text:span><text:span text:style-name="T2">(1/28) </text:span> (1ⲁ) [ ⲟⲩⲟ]ⲛ ⲛⲓⲙ̣[ <text:line-break/><text:span text:style-name="T1"> </text:span><text:span text:style-name="T2">(1/29) </text:span> (1ⲁ) [ ]ⲑⲟⲥ[ <text:line-break/><text:span text:style-name="T1"> </text:span><text:span text:style-name="T2">(2/6) </text:span> [ 9+- ].[ <text:line-break/><text:span text:style-name="T1"> </text:span><text:span text:style-name="T2">(2/7) </text:span> [ 7+- ].ⲟⲩ[ <text:line-break/><text:span text:style-name="T1"> </text:span><text:span text:style-name="T2">(2/8) </text:span> [.]ⲣ̣ⲉ̣[..]ϭ̣ⲏ ⲛ̅ϥ[ <text:line-break/><text:span text:style-name="T1"> </text:span><text:span text:style-name="T2">(2/9) </text:span> ⲉⲉⲓϫ̣ⲱ̣ ⲅ̣ⲁⲣ ⲙ̅ⲡ̣[ <text:line-break/><text:span text:style-name="T1"> </text:span><text:span text:style-name="T2">(2/10) </text:span> ⲥⲟⲟⲩⲛⲉ ⲙ̅ⲡⲛ[ⲟⲩⲧⲉ <text:line-break/><text:span text:style-name="T1"> </text:span><text:span text:style-name="T2">(2/11) </text:span> ⲙⲉ ϯ ⲡⲉⲩⲟⲩⲟ̣[ <text:line-break/><text:span text:style-name="T1"> </text:span><text:span text:style-name="T2">(2/12) </text:span> ⲡⲗⲁⲛⲏ· ⲁⲗⲗⲁ[ <text:line-break/><text:span text:style-name="T1"> </text:span><text:span text:style-name="T2">(2/13) </text:span> ⲥⲉⲙ̅ⲡϣⲁ ⲙ̅ⲡⲙ[ <text:line-break/><text:span text:style-name="T1"> </text:span><text:span text:style-name="T2">(2/14) </text:span> ϩⲟⲩⲛ ⲉⲡⲛⲟⲩⲧⲉ ⲉ̣[ <text:line-break/><text:span text:style-name="T1"> </text:span><text:span text:style-name="T2">(2/15) </text:span> ⲁⲩⲱ ⲏⲇⲏ ⲁⲩⲙⲟ[ <text:line-break/><text:span text:style-name="T1"> </text:span><text:span text:style-name="T2">(2/16) </text:span> ⲧ̅ⲙ̅ⲛ̅ⲧ̅ⲁⲧⲥⲟⲟⲩ[ⲛⲉ <text:line-break/><text:span text:style-name="T1"> </text:span><text:span text:style-name="T2">(2/17) </text:span> ⲣⲉⲧⲇⲓⲕⲁⲓⲟⲥⲩⲛ[ⲏ <text:line-break/><text:span text:style-name="T1"> </text:span><text:span text:style-name="T2">(2/18) </text:span> ⲙⲟⲥ ⲛⲉⲩⲙ̅ⲡ[ϣⲁ <text:line-break/><text:span text:style-name="T1"> </text:span><text:span text:style-name="T2">(2/19) </text:span> ⲛ̅ϭⲓ ⲛⲁⲉⲓ· ⲛ̅ⲧⲟϥ̣[ <text:line-break/><text:span text:style-name="T1"> </text:span><text:span text:style-name="T2">(2/20) </text:span> ⲉⲓ ⲡⲁⲉⲓⲱⲧ ⲉⲧⲉ ⲛ̅ⲥ[ <text:line-break/><text:span text:style-name="T1"> </text:span><text:span text:style-name="T2">(2/21) </text:span> ⲛ̣ⲉⲯ ⲉⲛ ⲛ̅ⲉⲓⲱⲧ ⲉ[ <text:line-break/><text:span text:style-name="T1"> </text:span><text:span text:style-name="T2">(2/22) </text:span> [.]ⲉ̣ ϯⲙⲉⲉⲩⲉ ϫⲉ ⲡ.[ <text:line-break/><text:span text:style-name="T1"> </text:span><text:span text:style-name="T2">(2/23) </text:span> [...]ⲉ ⲡⲉⲉⲓ ⲛ̅ⲧⲁϯⲛ[ <text:line-break/><text:span text:style-name="T1"> </text:span><text:span text:style-name="T2">(2/24) </text:span> [....].ϯϯ ⲟⲛ ⲙ̅ⲡ.[ <text:line-break/><text:span text:style-name="T1"> </text:span><text:span text:style-name="T2">(2/25) </text:span> [....]ⲉ̣ⲩⲕⲱ ⲉⲃⲟⲗ ϩ.[ <text:line-break/><text:span text:style-name="T1"> </text:span><text:span text:style-name="T2">(2/26) </text:span> [.....].ϫⲟⲟϥ ⲛ̅ϭⲓ̣[ <text:line-break/><text:span text:style-name="T1"> </text:span><text:span text:style-name="T2">(2/27) </text:span> [....ⲙ̅]ⲙⲟϥ ⲛ̅ϭⲓ ⲡ[ <text:line-break/><text:soft-page-break/><text:span text:style-name="T1"> </text:span><text:span text:style-name="T2">(2/28) </text:span> [ 8+- ]ⲛⲉⲥ̣[ <text:line-break/><text:span text:style-name="T1"> </text:span><text:span text:style-name="T2">(2/29) </text:span> [ 8+- ]ⲉ̣ⲁϥ[ <text:line-break/><text:span text:style-name="T1"> </text:span><text:span text:style-name="T2">(3/24) </text:span> ].[ <text:line-break/><text:span text:style-name="T1"> </text:span><text:span text:style-name="T2">(3/25) </text:span> ]ⲟ̣ⲡ[ <text:line-break/><text:span text:style-name="T1"> </text:span><text:span text:style-name="T2">(3/26) </text:span> ]ⲁⲓ ⲛ̣[ <text:line-break/><text:span text:style-name="T1"> </text:span><text:span text:style-name="T2">(3/27) </text:span> ]ⲙ̅ⲙⲟⲥ[ <text:line-break/><text:span text:style-name="T1"> </text:span><text:span text:style-name="T2">(3/28) </text:span> ]ϫ̣ⲡⲟϥ ⲛ̣[ <text:line-break/><text:span text:style-name="T1"> </text:span><text:span text:style-name="T2">(3/29) </text:span> ⲙ]ⲉⲉⲩⲉ ϫⲉ[ <text:line-break/><text:span text:style-name="T1"> </text:span><text:span text:style-name="T2">(4/24) </text:span> →a) ].[ <text:line-break/><text:span text:style-name="T1"> </text:span><text:span text:style-name="T2">(4/25) </text:span> →a) ]ⲧⲉ[ <text:line-break/><text:span text:style-name="T1"> </text:span><text:span text:style-name="T2">(4/26) </text:span> →a) ]ⲫⲓⲗ[ⲟⲥⲟⲫⲟⲥ <text:line-break/><text:span text:style-name="T1"> </text:span><text:span text:style-name="T2">(4/27) </text:span> →a) ]ⲙⲉⲩϣⲣ̅[ <text:line-break/><text:span text:style-name="T1"> </text:span><text:span text:style-name="T2">(4/28) </text:span> →a) ⲫⲓ]ⲗⲟⲥⲟⲫⲟ̣ⲥ̣[ <text:line-break/><text:span text:style-name="T1"> </text:span><text:span text:style-name="T2">(4/29) </text:span> →a) ]ⲕⲟⲥⲙⲟⲥ ʹ263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5:51:14.224167000</meta:creation-date>
    <dc:date>2026-03-24T15:53:05.663714500</dc:date>
    <meta:editing-duration>PT1M51S</meta:editing-duration>
    <meta:editing-cycles>1</meta:editing-cycles>
    <meta:document-statistic meta:table-count="0" meta:image-count="0" meta:object-count="0" meta:page-count="11" meta:paragraph-count="6" meta:word-count="2334" meta:character-count="16199" meta:non-whitespace-character-count="12518"/>
    <meta:generator>LibreOffice/26.2.1.2$Windows_X86_64 LibreOffice_project/620$Build-2</meta:generator>
  </office:meta>
</office:document-meta>
</file>