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IV ) The Apocryphon of John</text:p>
      <text:p text:style-name="P2"><text:span text:style-name="T1"> </text:span><text:span text:style-name="T2">(1/1) </text:span> [ⲧⲉⲥⲃⲱ ⲛ̅ⲧⲉ ⲡⲥⲱⲧ]ⲏⲣ· ⲁⲩⲱ <text:line-break/><text:span text:style-name="T1"> </text:span><text:span text:style-name="T2">(1/2) </text:span> [ⲡϭⲱⲗⲡ̅’ ⲉⲃⲟⲗ ⲛ̅ⲙ̅ⲙ]ⲩⲥⲧⲏⲣⲓⲟⲛ <text:line-break/><text:span text:style-name="T1"> </text:span><text:span text:style-name="T2">(1/3) </text:span> [ⲙⲛ̅ ⲛⲉⲧ’ϩⲏⲡ’ ϩⲛ̅] ⲟⲩⲙ̅ⲛ̅ⲧ̅’̅ⲕⲁⲣⲱϥ <text:line-break/><text:span text:style-name="T1"> </text:span><text:span text:style-name="T2">(1/4) </text:span> [ⲙⲛ̅ ⲛⲁⲓ̈ ⲛ̅ⲁϥⲧⲥⲁ]ⲃ̣[ⲟⲟⲩ ⲉⲓ̈]ⲱ̣‐ <text:line-break/><text:span text:style-name="T1"> </text:span><text:span text:style-name="T2">(1/5) </text:span> [ϩⲁⲛⲛⲏⲥ ⲡⲉⲫⲙⲁⲑⲏⲧⲏⲥ] <text:line-break/><text:span text:style-name="T1"> </text:span><text:span text:style-name="T2">(2/1) </text:span> ⲉⲧⲃⲉ ⲑⲉ̣ [ⲉⲛⲧⲁⲩⲡⲱϣⲛ̅ ⲙ̅]‐ <text:line-break/><text:span text:style-name="T1"> </text:span><text:span text:style-name="T2">(2/2) </text:span> ⲡⲥⲱⲧⲏⲣ [ⲁⲩⲱ ϫⲉ ⲉⲧⲃⲉ ⲟⲩ] <text:line-break/><text:span text:style-name="T1"> </text:span><text:span text:style-name="T2">(2/3) </text:span> ⲁⲩⲧⲛ̅ⲛⲟⲟⲩ̣[ϥ ⲉⲡⲕⲟⲥⲙⲟⲥ] <text:line-break/><text:span text:style-name="T1"> </text:span><text:span text:style-name="T2">(2/4) </text:span> {ϩ̅ⲓ}ⲧⲛ̅ [ⲡⲉϥ]ⲉ̣ⲓ̣[ⲱⲧ’· ⲁⲩⲱ ⲛⲓⲙ ⲡⲉ] <text:line-break/><text:span text:style-name="T1"> </text:span><text:span text:style-name="T2">(3/1) </text:span> [ϣ̅ⲙ̅ⲧ̅’̅ⲙⲟ]ⲣⲫⲏ· ⲡⲉ̣ϫⲁϥ ⲛⲁⲓ̈ ϫⲉ <text:line-break/><text:span text:style-name="T1"> </text:span><text:span text:style-name="T2">(3/2) </text:span> [ⲓ̈ⲱϩⲁⲛⲛⲏ· ⲉ]ⲧⲃⲉ ⲟⲩ ⲕⲣ̅ⲇⲓⲥⲧⲁⲍⲉ <text:line-break/><text:span text:style-name="T1"> </text:span><text:span text:style-name="T2">(3/3) </text:span> [ⲏ%0 ⲉⲧⲃⲉ ⲟⲩ ⲕⲟ ⲛ̅]ϩⲟⲧ̣ⲉ· ⲙ[ⲏ] ⲛ̣̅ⲧⲕ̅ <text:line-break/><text:span text:style-name="T1"> </text:span><text:span text:style-name="T2">(3/4) </text:span> [ⲟⲩϣⲙ̅ⲙⲟ ⲉϯⲉⲓ]ⲇ̣[ⲉ]ⲁ ⲉⲧⲉ ⲧ[ⲁ]ⲓ̈ [ⲧⲉ] <text:line-break/><text:span text:style-name="T1"> </text:span><text:span text:style-name="T2">(3/5) </text:span> [ⲙ̅ⲡⲣ̅ⲣ̅ ϩⲏⲧ’ ϣⲏ]ⲙ̣ ⲁⲛⲟⲕ ⲡⲉⲧ̣ϣ̣ⲟ‐ <text:line-break/><text:span text:style-name="T1"> </text:span><text:span text:style-name="T2">(3/6) </text:span> [ⲟⲡ’ ⲛⲙ̅ⲙⲏⲧⲛ̅ ⲛ̅ⲟⲩ]ⲟⲉⲓϣ ⲛⲓⲙ[·] <text:line-break/><text:span text:style-name="T1"> </text:span><text:span text:style-name="T2">(3/7) </text:span> [ⲁⲛⲟⲕ ⲡⲉ ⲡⲓⲱⲧ’· ⲁ]ⲛⲟⲕ ⲡⲉ ⲧⲙⲁⲁ̣ⲩ <text:line-break/><text:span text:style-name="T1"> </text:span><text:span text:style-name="T2">(3/8) </text:span> [ⲁⲛⲟⲕ ⲡⲉ ⲡϣⲏⲣⲉ·] ⲁⲛⲟⲕ ⲡⲉ ⲡ[ⲓ]ⲁ̣ⲧ’‐ <text:line-break/><text:span text:style-name="T1"> </text:span><text:span text:style-name="T2">(3/9) </text:span> [ⲧⲱⲗⲙ̅ ⲁⲩⲱ ⲡⲓⲁⲧ’]ϫⲱϩⲙ̅· ⲧ̣ⲉⲛ̣[ⲟ]ⲩ <text:line-break/><text:span text:style-name="T1"> </text:span><text:span text:style-name="T2">(3/10) </text:span> [ⲁⲓ̈{ⲉ̅ⲓ} ⲉⲧⲥⲁⲃⲟⲕ ϫⲉ ⲟ]ⲩ ⲡⲉⲧ̣ϣⲟ̣ⲟⲡ’ <text:line-break/><text:span text:style-name="T1"> </text:span><text:span text:style-name="T2">(3/11) </text:span> [ⲁⲩⲱ ⲟⲩ ⲡⲉⲛⲧⲁϥϣⲱⲡⲉ] ⲁⲩⲱ ⲟⲩ <text:line-break/><text:span text:style-name="T1"> </text:span><text:span text:style-name="T2">(3/12) </text:span> [ⲡⲉⲧⲉϣϣⲉ ⲉϣⲱⲡⲉ· ϫ]ⲉⲕ̣ⲁⲁⲥ <text:line-break/><text:span text:style-name="T1"> </text:span><text:span text:style-name="T2">(3/13) </text:span> [ⲉⲕⲛⲁⲙ̅ⲙⲉ ⲉⲛⲉⲧⲉ ⲛ̅ⲥⲉⲟⲩⲟ]ⲛϩ̅ ⲁⲛ̣ <text:line-break/><text:span text:style-name="T1"> </text:span><text:span text:style-name="T2">(3/14) </text:span> [ⲙⲛ̅ ⲛⲉⲧⲟⲩⲟⲛϩ̅· ⲁⲩⲱ ⲉⲧⲥ]ⲁ̣[ⲃⲟⲕ] <text:line-break/><text:span text:style-name="T1"> </text:span><text:span text:style-name="T2">(3/15) </text:span> [ⲉⲧⲅⲉⲛⲉⲁ ⲛ̅ⲁⲧⲕⲓⲙ ⲛ̅ⲧⲉ ⲡ]ⲉ̣ⲓⲧ̣ⲏⲗ̣ⲉ̣ⲓ̣[ⲟⲥ] <text:line-break/><text:span text:style-name="T1"> </text:span><text:span text:style-name="T2">(3/16) </text:span> [ⲛ̅ⲣⲱⲙⲉ· ⲧⲉⲛⲟⲩ ϭⲉ ϥⲓ] ⲙ̣̅ⲡⲉⲕ‐ <text:line-break/><text:span text:style-name="T1"> </text:span><text:span text:style-name="T2">(3/17) </text:span> [ϩⲟ ⲉϩⲣⲁⲓ̈ ϫⲉⲕⲁⲁⲥ ⲉⲕⲛⲁϫⲓ] ⲛ̅ⲛⲉϯ[ⲛⲁ]‐ <text:line-break/><text:span text:style-name="T1"> </text:span><text:span text:style-name="T2">(3/18) </text:span> [ⲧⲥⲁⲃⲟⲟⲩ ⲉⲣⲟⲕ ⲙ̅ⲡⲟⲟⲩ ⲁⲩⲱ] ϫⲉⲕⲁ‐ <text:line-break/><text:span text:style-name="T1"> </text:span><text:span text:style-name="T2">(3/19) </text:span> [ⲁⲥ ⲉⲕⲛⲁⲧⲁⲩⲟⲩ ⲛ̅ⲛⲉⲕϣ]ⲃⲏⲣ ⲙ̅ⲡ̅ⲛ̅ⲁ̅ <text:line-break/><text:span text:style-name="T1"> </text:span><text:span text:style-name="T2">(3/20) </text:span> [ⲛⲁⲓ̈ ⲉⲧϣⲟⲟⲡ’ ⲉⲃⲟⲗ ϩⲛ̅] ⲧⲅⲉⲛⲉⲁ <text:line-break/><text:span text:style-name="T1"> </text:span><text:span text:style-name="T2">(3/21) </text:span> [ⲛ̅ⲁⲧ’ⲕⲓⲙ ⲛ̅ⲧⲉ ⲡⲉⲓ]ⲧ̣[ⲉⲗⲉⲓⲟ]ⲥ ⲛ̅ⲣⲱ̣ⲙⲉ <text:line-break/><text:span text:style-name="T1"> </text:span><text:span text:style-name="T2">(3/22) </text:span> [ⲁⲩⲱ ⲁⲛⲟⲕ ⲁⲓ̈ϫ]ⲛⲟ̣[ⲩⲥ ϫⲉ]ⲕⲁ[ⲁ]ⲥ̣ ⲉⲓ̈‐ <text:line-break/><text:span text:style-name="T1"> </text:span><text:span text:style-name="T2">(3/23) </text:span> [ⲛⲁⲙ̅ⲙⲉ ⲉⲣⲟⲥ· ⲁⲩ]ⲱ ⲡ̣[ⲉϫⲁϥ ⲛⲁⲓ̈] ϫⲉ <text:line-break/><text:span text:style-name="T1"> </text:span><text:span text:style-name="T2">(3/24) </text:span> [ⲧⲙⲟⲛⲁⲥ ⲟⲩⲙⲟ]ⲛ̣ⲁⲣⲭ̣[ⲓⲁ ⲧⲉ ⲉ]ⲙ̣ⲛ̅ ⲡⲉⲧ’‐ <text:line-break/><text:span text:style-name="T1"> </text:span><text:span text:style-name="T2">(3/25) </text:span> [ϣⲟⲟⲡ’ {ϩ̅ⲓ}ϫⲱⲥ ⲡⲁⲓ̈ ⲉ]ⲧ’̣ϣ̣[ⲟⲟ]ⲡ’ ⲛ̅‐ <text:line-break/><text:span text:style-name="T1"> </text:span><text:span text:style-name="T2">(3/26) </text:span> [ⲛⲟⲩⲧⲉ ⲁⲩⲱ ⲛ̅ⲉⲓⲱⲧ’] ⲙ̅[ⲡⲧ]ⲏⲣϥ̅ ⲡⲉ <text:line-break/><text:span text:style-name="T1"> </text:span><text:span text:style-name="T2">(3/27) </text:span> [ⲡⲓⲁϩⲟⲣⲁⲧⲟⲥ ⲉⲧ’]ϣ̣ⲟⲟⲡ’ {ϩ̅ⲓ}ϫⲛ̅ <text:line-break/><text:span text:style-name="T1"> </text:span><text:span text:style-name="T2">(3/28) </text:span> [ⲡⲧⲏⲣϥ̅ ⲡⲉⲧ’ϣⲟⲟⲡ’ ⲛ̅]ⲧ̣ⲙ̅ⲛ̅ⲧ̅’̅ⲁⲧ’ⲧⲁ‐ <text:line-break/><text:span text:style-name="T1"> </text:span><text:span text:style-name="T2">(3/29) </text:span> [ⲕⲟ ⲉⲧ’ϣⲟⲟⲡ’ ϩⲙ̅ ⲡⲟ]ⲩⲟ̣ⲉⲓⲛ ⲉⲧ’ⲧⲃ̅ⲃⲏⲟⲩ <text:line-break/><text:span text:style-name="T1"> </text:span><text:span text:style-name="T2">(4/1) </text:span> ⲡⲁⲓ̈ ⲉⲧⲉ [ⲙ̅]ⲙⲛ̅ ϣϭⲟ[ⲙ ⲛ̅ⲗⲁⲁⲩ ⲛ̅ⲃⲁⲗ ⲉ]‐ <text:line-break/><text:span text:style-name="T1"> </text:span><text:span text:style-name="T2">(4/2) </text:span> ϭⲱϣⲧ̅’ ⲛ̅ⲥ̣ⲱϥ ⲛ̅ⲧ[ⲟϥ ⲡⲉ ⲡⲉⲡ̅ⲛ̅ⲁ̅] <text:line-break/><text:span text:style-name="T1"> </text:span><text:span text:style-name="T2">(4/3) </text:span> ⲛ̅ⲁϩⲟⲣⲁⲧⲟⲛ ⲛ̅ⲥϣ̣̅[ϣⲉ ⲁⲛ ⲉⲙⲉⲉⲩⲉ] <text:line-break/><text:span text:style-name="T1"> </text:span><text:span text:style-name="T2">(4/4) </text:span> ⲉⲣ[ⲟϥ] ⲛ̣̅[ⲑ]ⲉ ⲛ̅ⲛ̣ⲓⲛⲟ̣[ⲩⲧⲉ ⲏ%0 ϫⲉ ⲉϥⲟ ⲛ̅]‐ <text:line-break/><text:span text:style-name="T1"> </text:span><text:span text:style-name="T2">(4/5) </text:span> ϯ̣ϩⲉ· ⲛ̅ⲧⲟϥ ⲅⲁⲣ̣ [ⲟⲩϩⲟⲩⲟ ⲉⲛⲟⲩⲧⲉ ⲡⲉ] <text:line-break/><text:span text:style-name="T1"> </text:span><text:span text:style-name="T2">(4/6) </text:span> ⲉ̣ⲙⲛ̅ ⲡⲉⲧ’ϣⲟ[ⲟⲡ’ {ϩ̅ⲓ}ϫⲱϥ ⲙ̅ⲙⲛ̅ ⲗⲁⲁⲩ] <text:line-break/><text:span text:style-name="T1"> </text:span><text:span text:style-name="T2">(4/7) </text:span> [ⲅⲁⲣ] ⲟ̣ ⲛ̅ϫⲟⲉⲓⲥ ⲉ̣[ⲣⲟϥ ϥϣⲟⲟⲡ’ ⲅⲁⲣ ⲁⲛ ϩⲛ̅] <text:line-break/><text:span text:style-name="T1"> </text:span><text:span text:style-name="T2">(4/8) </text:span> ⲗⲁⲁⲩ ⲛ̅ϭⲱϫⲃ̅ [ⲉⲣⲟϥ ⲉⲣⲉⲡⲧⲏⲣϥ̅ ϣⲟ]‐ <text:line-break/><text:span text:style-name="T1"> </text:span><text:span text:style-name="T2">(4/9) </text:span> ⲟ̣ⲡ’ ⲛ̅ϩⲏⲧϥ̅· ⲛ̅[ⲧⲟϥ ⲅⲁⲣ ⲡⲉⲧⲧ’ⲁϩⲟϥ] <text:line-break/><text:soft-page-break/><text:span text:style-name="T1"> </text:span><text:span text:style-name="T2">(4/10) </text:span> ⲉ̣[ⲣⲁ]ⲧϥ̅ ⲟⲩⲁⲁϥ [ⲛ̅ⲧⲟϥ ⲟⲩϣⲁ ⲉⲛⲉϩ ⲡⲉ] <text:line-break/><text:span text:style-name="T1"> </text:span><text:span text:style-name="T2">(4/11) </text:span> ⲉⲃⲟⲗ [ϫⲉ ϥⲣ̅ ⲭⲣⲉⲓⲁ ⲛ̅ⲗⲁⲁⲩ ⲁⲛ ⲛ̅ⲧⲟϥ] <text:line-break/><text:span text:style-name="T1"> </text:span><text:span text:style-name="T2">(4/12) </text:span> ⲅⲁⲣ ⲟⲩ[ϫⲱⲕ ⲧⲏⲣϥ̅ ⲡⲉ ⲙ̅ⲡⲉϥϣⲱⲱⲧ’ ⲛ̅]‐ <text:line-break/><text:span text:style-name="T1"> </text:span><text:span text:style-name="T2">(4/13) </text:span> ⲗⲁⲁⲩ [ϫⲉⲕⲁⲁⲥ ⲉϥⲛⲁϫⲱⲕ ⲛ̅ϩⲏⲧϥ̅·] <text:line-break/><text:span text:style-name="T1"> </text:span><text:span text:style-name="T2">(4/14) </text:span> [ⲁⲗ]ⲗ̣[ⲁ ⲛ̅ⲟⲩⲟⲉⲓϣ ⲛⲓⲙ ⲉϥϫⲏⲕ] <text:line-break/><text:span text:style-name="T1"> </text:span><text:span text:style-name="T2">(4/15) </text:span> ⲧ̣ⲏⲣ̣ϥ̅ [ϩⲛ̅ ⲟⲩⲟⲉⲓⲛ· ⲟⲩⲁⲧϯ ⲧⲟϣϥ̅] <text:line-break/><text:span text:style-name="T1"> </text:span><text:span text:style-name="T2">(4/16) </text:span> ⲡⲉ· ⲉ[ⲃⲟⲗ ϫⲉ ⲙ̅ⲙⲛ̅ ⲡⲉⲧ’ϩⲁⲧⲉϥⲉϩⲏ] <text:line-break/><text:span text:style-name="T1"> </text:span><text:span text:style-name="T2">(4/17) </text:span> ⲉⲧⲣⲉ̣[ϥϯ ⲧⲱϣ ⲉⲣⲟϥ ⲟⲩⲁⲧ’ϩⲉⲧ’]‐ <text:line-break/><text:span text:style-name="T1"> </text:span><text:span text:style-name="T2">(4/18) </text:span> ϩⲱⲧϥ̣̅ [ⲡⲉ ϫⲉ ⲙ̅ⲙⲛ̅ ⲡⲉⲧ’ϣⲟⲟⲡ’ ϩⲁ]‐ <text:line-break/><text:span text:style-name="T1"> </text:span><text:span text:style-name="T2">(4/19) </text:span> ⲧⲉϥⲉϩ[ⲏ ⲉⲧⲣⲉϥϩⲉⲧ’ϩⲱⲧϥ̅· ⲟⲩⲁⲧ’]‐ <text:line-break/><text:span text:style-name="T1"> </text:span><text:span text:style-name="T2">(4/20) </text:span> ϣⲓⲧϥ̅ [ⲡⲉ ⲉⲃⲟⲗ ϫⲉ ϩⲁⲧⲉϥⲉϩⲏ ⲙ̅]‐ <text:line-break/><text:span text:style-name="T1"> </text:span><text:span text:style-name="T2">(4/21) </text:span> ⲙⲛ̅ ⲡ[ⲉⲧ’ϣⲟⲟⲡ’ ⲉⲧⲣⲉϥϣⲓ ⲉⲣⲟϥ] <text:line-break/><text:span text:style-name="T1"> </text:span><text:span text:style-name="T2">(4/22) </text:span> ⲟ̣ⲩ̣ⲁ̣ⲧ’[ⲛⲁⲩ] ⲉⲣⲟ̣[ϥ ⲡⲉ· ⲉⲃⲟⲗ ϫⲉ ⲙ̅ⲡⲉ]‐ <text:line-break/><text:span text:style-name="T1"> </text:span><text:span text:style-name="T2">(4/23) </text:span> ⲗ̣[ⲁⲁⲩ ⲛⲁⲩ] ⲉ̣ⲣⲟ[ϥ· ⲟⲩϣⲁ ⲉⲛⲉϩ ⲡⲉ] <text:line-break/><text:span text:style-name="T1"> </text:span><text:span text:style-name="T2">(4/24) </text:span> ⲉϥ[ϣⲟⲟⲡ’ ϣ]ⲁ̣ ⲉ[ⲛⲉϩ· ⲟⲩⲁⲧ’ϣⲁϫⲉ] <text:line-break/><text:span text:style-name="T1"> </text:span><text:span text:style-name="T2">(4/25) </text:span> ⲉⲣⲟ̣[ϥ ⲡ]ⲉ· ⲉ̣[ⲃⲟⲗ ϫⲉ ⲙ̅ⲡⲉⲗⲁⲁⲩ ϣ]‐ <text:line-break/><text:span text:style-name="T1"> </text:span><text:span text:style-name="T2">(4/26) </text:span> ⲧⲁϩⲟϥ̣ ⲉϣⲁ[ϫⲉ ⲉⲣⲟϥ· ⲟⲩⲁⲧ’ϯ ⲣⲁⲛ] <text:line-break/><text:span text:style-name="T1"> </text:span><text:span text:style-name="T2">(4/27) </text:span> ⲉⲣⲟϥ ⲡⲉ ϫⲉ̣ [ⲙ̅ⲙⲛ̅ ⲡⲉⲧ’ϩⲁⲧⲉϥⲉϩⲏ] <text:line-break/><text:span text:style-name="T1"> </text:span><text:span text:style-name="T2">(4/28) </text:span> ⲉⲧⲣⲉϥϯ̣ [ⲣⲁⲛ ⲉⲣⲟϥ ⲡⲟⲩⲟⲉⲓⲛ] <text:line-break/><text:span text:style-name="T1"> </text:span><text:span text:style-name="T2">(5/1) </text:span> [ⲛ̅ⲁⲧϣⲓⲧϥ̅] ⲡ̣ⲉ ⲉϥⲧⲃ̅ⲃⲏ̣ⲟⲩ ⲉϥⲟⲩⲁⲁⲃ <text:line-break/><text:span text:style-name="T1"> </text:span><text:span text:style-name="T2">(5/2) </text:span> [ⲛ̅ⲕⲁⲑⲁⲣⲟⲛ·] ⲟⲩⲁⲧ’ϣⲁϫⲉ ⲉⲣⲟϥ ⲡⲉ <text:line-break/><text:span text:style-name="T1"> </text:span><text:span text:style-name="T2">(5/3) </text:span> [ⲉϥϫⲏⲕ ⲉⲃⲟⲗ· ϩ]ⲛ̅ ⲧⲙ̅ⲛ̅ⲧ̅’̅ⲁⲧ’ⲧⲁⲕⲟ <text:line-break/><text:span text:style-name="T1"> </text:span><text:span text:style-name="T2">(5/4) </text:span> [ϩⲛ̅ ⲟⲩⲙ̅ⲛ̅ⲧ̅’̅ⲧⲉ]ⲗⲓⲟⲥ̣ ⲁⲛ ⲟ̣ⲩⲧ̣ⲉ ϩⲛ̅ ⲟⲩ‐ <text:line-break/><text:span text:style-name="T1"> </text:span><text:span text:style-name="T2">(5/5) </text:span> [ⲙ̅ⲛ̅ⲧ̅’̅ⲙⲁⲕⲁⲣⲓ]ⲟ̣ⲥ ⲁⲛ· ⲟⲩⲧⲉ ϩⲛ̅ ⲟⲩ‐ <text:line-break/><text:span text:style-name="T1"> </text:span><text:span text:style-name="T2">(5/6) </text:span> [ⲙ̅ⲛ̅ⲧ̅’̅ⲛⲟⲩⲧⲉ ⲁⲛ·] ⲁⲗⲗⲁ ⲉϥⲥⲟ̣ⲧⲡ̅’ <text:line-break/><text:span text:style-name="T1"> </text:span><text:span text:style-name="T2">(5/7) </text:span> [ⲛ̅ϩⲟⲩⲟ· ⲟⲩⲥⲱ]ⲙⲁ̣ⲧⲓⲕⲟⲥ ⲁⲛ ⲡⲉ <text:line-break/><text:span text:style-name="T1"> </text:span><text:span text:style-name="T2">(5/8) </text:span> [ⲟⲩⲧⲉ ⲟⲩⲁ]ⲧ’̣ⲥ̣ⲱ̣ⲙⲁ ⲁⲛ ⲡⲉ· ⲟⲩⲛⲟϭ <text:line-break/><text:span text:style-name="T1"> </text:span><text:span text:style-name="T2">(5/9) </text:span> [ⲁⲛ ⲡⲉ· ⲟⲩⲧ]ⲉ ⲟⲩϣⲏⲙ ⲁⲛ ⲡⲉ· <text:line-break/><text:span text:style-name="T1"> </text:span><text:span text:style-name="T2">(5/10) </text:span> [ⲙ̅ⲙⲛ̅ ⲑⲉ ⲛ̅]ϫⲟ̣[ⲟ]ⲥ̣ ϫ̣ⲉ ⲟⲩⲏⲣ̣ ⲡⲉ ⲏ%0 ⲟⲩ‐ <text:line-break/><text:span text:style-name="T1"> </text:span><text:span text:style-name="T2">(5/11) </text:span> [ⲙ̅ⲙⲓⲛⲉ ⲡⲉ ⲙ̅ⲙ]ⲛ̅ ϭⲟⲙ ⲅⲁⲣ ⲛ̅ⲧⲉⲗⲁⲁⲩ <text:line-break/><text:span text:style-name="T1"> </text:span><text:span text:style-name="T2">(5/12) </text:span> [ⲣ̅ⲛⲟⲉⲓ ⲙ̅ⲙⲟϥ]· ⲟⲩⲗⲁⲁ̣ⲩ̣ ⲁⲛ ⲡⲉ ϩⲛ̅ <text:line-break/><text:span text:style-name="T1"> </text:span><text:span text:style-name="T2">(5/13) </text:span> [ⲛⲉⲧ’ϣⲟⲟⲡ’· ⲁⲗⲗⲁ ⲉϥ]ⲥ̣ⲟ̣[ⲧ]ⲡ̅’ ⲛ̅ϩⲟⲩⲟ <text:line-break/><text:span text:style-name="T1"> </text:span><text:span text:style-name="T2">(5/14) </text:span> [ϩⲱⲥ ⲁⲛ ⲉ]ϥ̣ⲥ̣ⲟ̣[ⲧⲡ̅’·] ⲁⲗⲗⲁ ⲙ̅ⲡ̣[ⲁ]ⲓ̣̈ ⲉⲧⲉ <text:line-break/><text:span text:style-name="T1"> </text:span><text:span text:style-name="T2">(5/15) </text:span> [ⲡⲱϥ ⲉϥⲙⲉ]ⲧ̣ⲉ̣[ⲭ]ⲉ̣ ⲁ̣ⲛ ϩⲛ̅ ⲛⲁⲓ̣ⲱⲛ ⲟⲩⲇⲉ <text:line-break/><text:span text:style-name="T1"> </text:span><text:span text:style-name="T2">(5/16) </text:span> [ϩⲛ̣̅ ⲭⲣⲟⲛⲟⲥ·] ⲡ̣ⲉⲧⲙⲉⲧⲉⲭⲉ ⲅⲁⲣ ϩ[ⲛ̅] <text:line-break/><text:span text:style-name="T1"> </text:span><text:span text:style-name="T2">(5/17) </text:span> [ⲟⲩⲁⲓⲱⲛ ⲡⲁⲓ̈] ⲛ̣̅ⲧⲁⲩⲣ̅ϣ̣ⲟ̣[ⲣ]ⲡ̅’ ⲛ̅ⲥⲃ̣̅ⲧⲱ‐ <text:line-break/><text:span text:style-name="T1"> </text:span><text:span text:style-name="T2">(5/18) </text:span> [ⲧϥ̅· ⲙ̅ⲡⲟⲩⲡ]ⲟ̣ⲣϫϥ̅ ϩⲛ̅ [ⲟⲩ]ⲭ̣ⲣⲟⲛⲟⲥ· <text:line-break/><text:span text:style-name="T1"> </text:span><text:span text:style-name="T2">(5/19) </text:span> [ϫⲉ ⲉⲃⲟⲗ {ϩ̅ⲓ}ⲧ]ⲛ̅ ⲕⲉⲟⲩ[ⲁ] ⲉⲙⲁϥϫⲓ ⲗⲁ‐ <text:line-break/><text:span text:style-name="T1"> </text:span><text:span text:style-name="T2">(5/20) </text:span> [ⲁⲩ· ⲡⲉⲧⲟⲩ]ϫ̣ⲓ ⲅⲁⲣ ⲉⲡ̣ⲟⲩϣⲁⲡ’ ⲡⲉ <text:line-break/><text:span text:style-name="T1"> </text:span><text:span text:style-name="T2">(5/21) </text:span> [ϥϣⲁⲁⲧ’ ⲅⲁ]ⲣ̣ ⲁⲛ̣ ⲛ̅ϭ̣ⲓ̣ ⲡⲉⲧⲟ ⲛ̅ϣⲟ‐ <text:line-break/><text:span text:style-name="T1"> </text:span><text:span text:style-name="T2">(5/22) </text:span> [ⲣⲡ̅’ ⲉⲣⲟϥ·] ϫⲉⲕⲁⲁⲥ ⲉϥⲛⲁϫⲓ ⲉⲃⲟⲗ <text:line-break/><text:span text:style-name="T1"> </text:span><text:span text:style-name="T2">(5/23) </text:span> [{ϩ̅ⲓ}ⲧⲟⲟⲧϥ̅·] ⲡ̣ⲁⲓ̈ ⲅⲁⲣ ⲉϥⲉⲓⲟⲣⲙ̅ ⲛ̅ⲥⲱϥ <text:line-break/><text:span text:style-name="T1"> </text:span><text:span text:style-name="T2">(5/24) </text:span> [ⲟⲩⲁⲁϥ ⲛ̅ϩ]ⲣⲁⲓ̈ ϩⲙ̅ ⲡⲉϥⲟⲩⲟⲉⲓⲛ <text:line-break/><text:span text:style-name="T1"> </text:span><text:span text:style-name="T2">(5/25) </text:span> [ⲡϫⲱⲕ ⲉⲃⲟⲗ] ⲅⲁⲣ ⲟⲩⲙⲉⲅ̣ⲉⲑⲟⲥ ⲡⲉ <text:line-break/><text:span text:style-name="T1"> </text:span><text:span text:style-name="T2">(5/26) </text:span> [ⲟⲩⲛⲟⲩⲥ ⲛ̅ⲁⲕ]ⲉⲣⲁⲓⲟⲥ ⲡⲉ ⲛ̅ⲁⲧϣⲓⲧϥ̅ <text:line-break/><text:span text:style-name="T1"> </text:span><text:span text:style-name="T2">(5/27) </text:span> [ⲟⲩⲁⲓⲱⲛ ⲡⲉ ⲉ]ϥ̣ϯ ⲛ̅ⲛⲟⲩⲁⲓⲱⲛ <text:line-break/><text:span text:style-name="T1"> </text:span><text:span text:style-name="T2">(6/1) </text:span> ⲟⲩⲱⲛϩ̅ ⲡ̣ⲉ ⲉϥϯ ⲛ̅ⲟ̣[ⲩⲱⲛϩ̅· ⲟⲩⲙⲁ]‐ <text:line-break/><text:soft-page-break/><text:span text:style-name="T1"> </text:span><text:span text:style-name="T2">(6/2) </text:span> ⲕⲁⲣⲓⲟⲥ ⲡⲉ ⲉϥϯ ⲛ̅[ⲛⲟⲩⲙ̅ⲛ̅ⲧ̅’̅ⲙⲁ]‐ <text:line-break/><text:span text:style-name="T1"> </text:span><text:span text:style-name="T2">(6/3) </text:span> ⲕⲁⲣⲓⲟⲥ· ⲟⲩⲅⲛⲱ̣[ⲥⲓⲥ ⲡⲉ ⲉϥϯ ⲛ̅ⲟⲩ]‐ <text:line-break/><text:span text:style-name="T1"> </text:span><text:span text:style-name="T2">(6/4) </text:span> ⲥⲟⲟ̣ⲩⲛ· ⲟⲩⲁⲅ̣ⲁⲑ̣[ⲟⲥ ⲡⲉ ⲉϥϯ ⲛ̅ⲟⲩ]‐ <text:line-break/><text:span text:style-name="T1"> </text:span><text:span text:style-name="T2">(6/5) </text:span> ⲙ̅ⲛ̅ⲧ̅’̅ⲁⲅⲁⲑⲟⲥ̣· ⲟ̣[ⲩⲛⲁ ⲡⲉ ⲉϥϯ ⲛ̅]‐ <text:line-break/><text:span text:style-name="T1"> </text:span><text:span text:style-name="T2">(6/6) </text:span> ⲛⲟⲩⲛⲁ ⲙⲛ̅ ⲟⲩ̣[ⲥⲱⲧⲉ· ⲟⲩⲭⲁⲣⲓⲥ ⲡⲉ] <text:line-break/><text:span text:style-name="T1"> </text:span><text:span text:style-name="T2">(6/7) </text:span> ⲉϥϯ ⲛ̅ⲛⲟⲩϩⲙⲟ[ⲧ’ ⲟⲩⲭ ϩⲟⲧⲓ ϫⲉ ⲟⲩ]‐ <text:line-break/><text:span text:style-name="T1"> </text:span><text:span text:style-name="T2">(6/8) </text:span> ⲛ̅ⲧⲁ〈ⲥ〉ϥ· ⲁⲗⲗⲁ ϫⲉ ⲉϥϯ [ⲙ̅ⲡⲟⲩⲟⲉⲓⲛ] <text:line-break/><text:span text:style-name="T1"> </text:span><text:span text:style-name="T2">(6/9) </text:span> ⲛ̅ⲁⲧ’ϣⲓⲧϥ̅ ⲛ̅ⲁⲧ’ⲧⲁϩ̣[ⲟϥ· ⲡⲱⲥ ϯϣⲁϫⲉ] <text:line-break/><text:span text:style-name="T1"> </text:span><text:span text:style-name="T2">(6/10) </text:span> ⲛⲙ̅ⲙⲁⲕ ⲉⲧⲃⲏⲏⲧϥ̅· ⲡ̣[ⲉϥⲁⲓⲱⲛ] <text:line-break/><text:span text:style-name="T1"> </text:span><text:span text:style-name="T2">(6/11) </text:span> ⲟⲩⲁⲧ’ⲧⲁⲕⲟ ⲡⲉ ⲉϥⲥϭ̣ⲣ̣[ⲁϩⲧ̅’· ⲁⲩⲱ] <text:line-break/><text:span text:style-name="T1"> </text:span><text:span text:style-name="T2">(6/12) </text:span> ⲉϥϣⲟⲟⲡ’ ϩⲛ̅ ⲟⲩ[ⲥⲓⲅⲏ· ⲉϥⲙ̅ⲧⲟⲛ ⲙ̅]‐ <text:line-break/><text:span text:style-name="T1"> </text:span><text:span text:style-name="T2">(6/13) </text:span> ⲙⲟϥ ⲉϥ̣[ⲟ] ⲛ̅ϣⲟⲣⲡ̅’ [ⲉⲡⲧⲏⲣϥ̅· ⲛ̅ⲧⲟϥ ⲅⲁⲣ] <text:line-break/><text:span text:style-name="T1"> </text:span><text:span text:style-name="T2">(6/14) </text:span> ⲡⲉ ⲧⲁ[ⲡ]ⲉ̣ ⲛ̅[ⲛⲁⲓ]ⲱⲛ̣ [ⲧⲏⲣⲟⲩ· ⲁⲩⲱ] <text:line-break/><text:span text:style-name="T1"> </text:span><text:span text:style-name="T2">(6/15) </text:span> ⲛ̅ⲧⲟϥ ⲉⲧ’ϯ ⲛⲁⲩ ⲛ̅ⲟⲩ̣[ⲧⲁϫⲣⲟ ⲛ̅ϩⲣⲁⲓ̈] <text:line-break/><text:span text:style-name="T1"> </text:span><text:span text:style-name="T2">(6/16) </text:span> ϩⲛ̅ ⲧⲉϥⲙ̅ⲛ̅ⲧ̅’̅ⲁⲅⲁⲑⲟ̣[ⲥ· ⲧⲛ̅ⲥⲟⲟⲩⲛ] <text:line-break/><text:span text:style-name="T1"> </text:span><text:span text:style-name="T2">(6/17) </text:span> ⲅⲁⲣ ⲁⲛ ⲁⲛⲟⲛ ⲉⲛⲉ[ⲧⲟ ⲛ̅ⲁⲧ’ϣⲓⲧϥ̅] <text:line-break/><text:span text:style-name="T1"> </text:span><text:span text:style-name="T2">(6/18) </text:span> ⲉⲓⲙⲏⲧ̣[ⲓ ⲉ]ⲡⲉⲛⲧⲁ̣ϥ̣[ⲟⲩⲱⲛϩ̅ ⲉⲃⲟⲗ] <text:line-break/><text:span text:style-name="T1"> </text:span><text:span text:style-name="T2">(6/19) </text:span> ⲛ̅ϩⲏⲧϥ̅ ⲉ̣[ⲧⲉ] ⲡⲁⲓ̈ ⲡⲉ̣ [ⲡⲓⲱⲧ’· ⲡⲁⲓ̈ ⲅⲁⲣ] <text:line-break/><text:span text:style-name="T1"> </text:span><text:span text:style-name="T2">(6/20) </text:span> ⲡⲉⲛⲧⲁϥ[ϫⲟ]ⲟⲥ ⲉⲣⲟⲛ [ϩⲱⲱⲛ· ⲛ̅ⲧⲟϥ] <text:line-break/><text:span text:style-name="T1"> </text:span><text:span text:style-name="T2">(6/21) </text:span> ⲅⲁⲣ ⲉⲧ’ϭ̣ⲱϣⲧ̅’ ⲉⲣⲟϥ [ⲟⲩⲁⲁϥ ⲛ̅ϩⲣⲁⲓ̈] <text:line-break/><text:span text:style-name="T1"> </text:span><text:span text:style-name="T2">(6/22) </text:span> ϩⲙ̅ ⲡⲉϥⲟ̣ⲩⲟⲉⲓⲛ ⲉⲧ’ⲕⲧ[ⲏⲟⲩ ⲉⲣⲟϥ] <text:line-break/><text:span text:style-name="T1"> </text:span><text:span text:style-name="T2">(6/23) </text:span> ⲉⲧⲉ ⲡⲁⲓ̈ ⲡⲉ ⲧ’ⲡⲏⲅⲏ ⲙ̣̅[ⲡⲙⲟⲟⲩ ⲛ̅]‐ <text:line-break/><text:span text:style-name="T1"> </text:span><text:span text:style-name="T2">(6/24) </text:span> ⲱⲛϩ̅ ⲁⲩⲱ ⲉϥϯ ⲛ̅ⲛⲁⲓ̣[ⲱⲛ ⲧⲏⲣⲟⲩ] <text:line-break/><text:span text:style-name="T1"> </text:span><text:span text:style-name="T2">(6/25) </text:span> ⲁⲩⲱ ϩⲛ̅ ⲥⲙⲟⲧ’ ⲛⲓⲙ ⲉ[ϥⲉⲓⲱⲣⲙ̅ ⲛ̅ⲥⲁ] <text:line-break/><text:span text:style-name="T1"> </text:span><text:span text:style-name="T2">(6/26) </text:span> ⲧⲉϥ{ϩ̅ⲓ}ⲕⲱⲛ ⲉϥⲛⲁⲩ ⲉ̣[ⲣⲟⲥ ⲛ̅ϩⲣⲁⲓ̈] <text:line-break/><text:span text:style-name="T1"> </text:span><text:span text:style-name="T2">(6/27) </text:span> ϩⲛ̅ ⲧⲡⲏⲅⲏ ⲛ̅ⲧⲉ ⲡⲉⲡ̅[̅ⲛ̅ⲁ̅ ⲉϥⲟⲩⲱϣⲉ] <text:line-break/><text:span text:style-name="T1"> </text:span><text:span text:style-name="T2">(6/28) </text:span> ϩⲙ̅ ⲡⲉϥⲟⲩⲟⲉⲓⲛ ⲙ̅ⲙ[ⲟⲟⲩ ⲉⲧϩⲛ̅ ⲧⲡⲏ]‐ <text:line-break/><text:span text:style-name="T1"> </text:span><text:span text:style-name="T2">(6/29) </text:span> ⲅⲏ ⲛ̅ⲧⲉ ⲡⲙⲟⲟⲩ [ⲛ̅ⲟⲩⲟⲉⲓⲛ ⲉⲧ’]‐ <text:line-break/><text:span text:style-name="T1"> </text:span><text:span text:style-name="T2">(7/1) </text:span> [ⲧⲃ̅ⲃⲏⲟⲩ ⲉⲧ’ⲕⲧⲏⲟⲩ ⲉⲣⲟϥ· ⲁⲩⲱ ⲁⲧⲉϥ]‐ <text:line-break/><text:span text:style-name="T1"> </text:span><text:span text:style-name="T2">(7/2) </text:span> [ⲉⲛⲛⲟⲓⲁ ⲧⲁⲙⲓⲟ ⲛ̅ⲟ]ⲩϩⲱ̣ⲃ ⲁ[ⲩⲱ ⲁⲥ]‐ <text:line-break/><text:span text:style-name="T1"> </text:span><text:span text:style-name="T2">(7/3) </text:span> [ϭⲱⲗⲡ̅’ ⲉⲃⲟⲗ ⲛ̅ϭ]ⲓ̣ ⲧ̣ⲁⲓ̈ ⲉⲧⲁϩⲟ[ⲩⲱⲛϩ̅] <text:line-break/><text:span text:style-name="T1"> </text:span><text:span text:style-name="T2">(7/4) </text:span> [ⲉⲃⲟⲗ ⲙ̅ⲡⲉϥⲙ̅]ⲧ̣ⲟ ⲉⲃⲟⲗ ϩⲙ̅ [ⲡ]ⲣ̅ⲣ̣[ⲓⲉ] <text:line-break/><text:span text:style-name="T1"> </text:span><text:span text:style-name="T2">(7/5) </text:span> [ⲛ̅ⲧⲉ ⲡⲉϥⲟⲩ]ⲟⲉⲓⲛ· ⲧⲁⲓ̈ ⲧⲉ ⲧϣⲟⲣⲡ̅’̣ <text:line-break/><text:span text:style-name="T1"> </text:span><text:span text:style-name="T2">(7/6) </text:span> [ⲛ̅ϭⲟⲙ ⲛ̅ⲧⲁⲥϣⲱ]ⲡ̣ⲉ ϩⲁⲧⲉⲩⲉϩⲏ ⲧⲏ̣‐ <text:line-break/><text:span text:style-name="T1"> </text:span><text:span text:style-name="T2">(7/7) </text:span> [ⲣⲟⲩ ⲛ̅ⲧⲁⲥⲟⲩⲱⲛϩ̅] ⲉⲃⲟⲗ ϩⲙ̅ [ⲡⲉϥ]ⲙⲉ̣ <text:line-break/><text:span text:style-name="T1"> </text:span><text:span text:style-name="T2">(7/8) </text:span> (7 lines missing) <text:line-break/><text:span text:style-name="T1"> </text:span><text:span text:style-name="T2">(7/15) </text:span> [ⲡⲉ ⲙ̅ⲙⲏⲧⲣⲁ ⲙ̅ⲡⲧⲏⲣϥ̅ ϫ]ⲉ̣ ⲛ̅ⲧⲟⲥ <text:line-break/><text:span text:style-name="T1"> </text:span><text:span text:style-name="T2">(7/16) </text:span> [ⲉⲥⲟ ⲛ̅ϣⲟⲣⲡ̅’ ⲉⲣⲟⲟⲩ] ⲧⲏⲣⲟⲩ· <text:line-break/><text:span text:style-name="T1"> </text:span><text:span text:style-name="T2">(7/17) </text:span> [ⲧⲙⲏⲧⲣⲟⲡⲁⲧⲱⲣ] ⲡ̣ϣⲟⲣⲡ̅’ ⲛ̅ⲣⲱ̣[ⲙⲉ] <text:line-break/><text:span text:style-name="T1"> </text:span><text:span text:style-name="T2">(7/18) </text:span> [ⲡⲉⲡ̅ⲛ̅ⲁ̅ ⲉⲧⲟⲩⲁⲁ]ⲃ· ⲡϣ̅ⲙⲧ’̅ϩⲟⲟⲩ̣[ⲧ’] <text:line-break/><text:span text:style-name="T1"> </text:span><text:span text:style-name="T2">(7/19) </text:span> [ⲧϣⲟⲙⲧⲉ ⲛ̅ϭⲟⲙ̣] ⲡϣ̅ⲙ̅ⲧ̅’̅ⲣⲁⲛ ⲛ̣̅‐ <text:line-break/><text:span text:style-name="T1"> </text:span><text:span text:style-name="T2">(7/20) </text:span> [ϩⲟⲟⲩⲧ’ ⲥ{ϩ̅ⲓ}ⲙⲉ ⲁ]ⲩⲱ ⲡⲁⲓⲱⲛ ⲛ̅[ϣⲁ] <text:line-break/><text:span text:style-name="T1"> </text:span><text:span text:style-name="T2">(7/21) </text:span> [ⲉⲛⲉϩ ϩⲛ̅ ⲛⲁⲧ’ⲛⲁⲩ ⲉⲣ]ⲟⲟⲩ· ⲁⲩⲱ̣ <text:line-break/><text:span text:style-name="T1"> </text:span><text:span text:style-name="T2">(7/22) </text:span> [ⲡϣⲟⲣⲡ̅’ ⲛ̅{ⲉ̅ⲓ} ⲉⲃⲟⲗ· ⲁϥ]ⲣ̅ⲁⲓⲧⲓ ⲉⲃⲟⲗ̣ [{ϩⲓ}]‐ <text:line-break/><text:span text:style-name="T1"> </text:span><text:span text:style-name="T2">(7/23) </text:span> [ⲧⲙ̅ ⲡⲁϩⲟⲣⲁⲧⲟⲛ ⲙ̅ⲡ]ⲁⲣⲑⲉⲛⲓⲕⲟ[ⲛ ⲙ̅]‐ <text:line-break/><text:span text:style-name="T1"> </text:span><text:span text:style-name="T2">(7/24) </text:span> [ⲡ̅ⲛ̅ⲁ̅ ⲉⲧⲉ ⲃ̅ⲁⲣⲃⲏⲗ]ⲱ̣̅ ⲧⲉ ⲁϯ ⲛⲁ[ⲥ ⲛ̅]‐ <text:line-break/><text:span text:style-name="T1"> </text:span><text:span text:style-name="T2">(8/1) </text:span> [ⲟⲩⲡⲣⲟⲅⲛⲱⲥⲓⲥ ⲁⲩⲱ ⲁϥⲉⲓⲱⲣⲙ̅] <text:line-break/><text:soft-page-break/><text:span text:style-name="T1"> </text:span><text:span text:style-name="T2">(8/2) </text:span> [ⲛ̅ϭⲓ ⲡ̅ⲛ̅]̅ⲁ̣̅̅· ⲛ̣̅[ⲧⲁϥⲉⲓⲱⲣⲙ̅ ⲇⲉ ⲁⲥ]‐ <text:line-break/><text:span text:style-name="T1"> </text:span><text:span text:style-name="T2">(8/3) </text:span> [ϭⲱ]ⲗ̣ⲡ̅’ ⲉⲃⲟⲗ ⲛ̣̅ϭ̣[ⲓ ⲧⲡⲣⲟⲅⲛⲱⲥⲓⲥ] <text:line-break/><text:span text:style-name="T1"> </text:span><text:span text:style-name="T2">(8/4) </text:span> [ⲁⲩ]ⲱ̣ ⲁⲥⲁϩⲉⲣⲁⲧ[ⲥ̅ ⲙⲛ̅ ⲧⲡⲣⲟⲛⲟⲓⲁ] <text:line-break/><text:span text:style-name="T1"> </text:span><text:span text:style-name="T2">(8/5) </text:span> ⲧⲁⲓ̈ ⲟ̣ⲩⲉⲃⲟⲗ ⲧⲉ ϩⲙ̅ [ⲡⲙⲉⲉⲩⲉ ⲙ̅ⲡⲓⲁⲧ’]‐ <text:line-break/><text:span text:style-name="T1"> </text:span><text:span text:style-name="T2">(8/6) </text:span> ⲛⲁⲩ ⲉⲣⲟϥ ⲙ̅ⲡⲁ̣ⲣⲑ̣[ⲉⲛⲓⲕⲟⲛ ⲙ̅ⲡ̅ⲛ̅ⲁ̅] <text:line-break/><text:span text:style-name="T1"> </text:span><text:span text:style-name="T2">(8/7) </text:span> ⲉⲥϯ ⲉⲟⲟⲩ ⲛⲁϥ̣ [ⲁⲩⲱ ⲧⲉϥϭⲟⲙ ⲉⲧ’]‐ <text:line-break/><text:span text:style-name="T1"> </text:span><text:span text:style-name="T2">(8/8) </text:span> ϫ[ⲏⲕ] ⲉⲃⲟⲗ ⲃ̅ⲁ̣̅̅[̅ⲣ̅ⲃ̅ⲏ̅ⲗ̅ⲱ̅ ϫⲉ ⲛ̅ⲧⲁⲥϣⲱ] <text:line-break/><text:span text:style-name="T1"> </text:span><text:span text:style-name="T2">(8/9) </text:span> (10 lines missing) <text:line-break/><text:span text:style-name="T1"> </text:span><text:span text:style-name="T2">(8/19) </text:span> ⲧⲟⲛ ⲙ̅ⲡ̣̅̅[̅ⲛ̅ⲁ̅·ⲁⲩⲱ ϩⲙ̅ ⲡⲧⲣⲉϥⲉⲓⲱⲣⲙ̅] <text:line-break/><text:span text:style-name="T1"> </text:span><text:span text:style-name="T2">(8/20) </text:span> ⲁϥϭⲱⲗⲡ̅’ ⲉⲃ[ⲟⲗ ⲛ̅ϭⲓ ⲡⲱⲛϩ̅ ϣⲁ ⲉⲛⲉϩ] <text:line-break/><text:span text:style-name="T1"> </text:span><text:span text:style-name="T2">(8/21) </text:span> ⲁ̣ⲩⲱ ⲁⲩϯ ⲉⲟⲟ̣[ⲩ ⲙ̅ⲡⲁϩⲟⲣⲁⲧⲟⲛ ⲙ̅ⲡ̅ⲛ̅ⲁ̅·] <text:line-break/><text:span text:style-name="T1"> </text:span><text:span text:style-name="T2">(8/22) </text:span> ⲁⲩⲱ ⲧⲃⲁⲣⲃⲏ[ⲗⲱ ⲧⲁⲓ̈ ⲉⲛⲧⲁⲩϣⲱⲡⲉ] <text:line-break/><text:span text:style-name="T1"> </text:span><text:span text:style-name="T2">(8/23) </text:span> ⲉⲧⲃⲏⲏⲧⲥ̅· ⲁⲩ[ⲱ ⲟⲛ ⲁⲥⲣ̅ⲁⲓⲧⲓ ⲉϯ ⲛⲁⲥ] <text:line-break/><text:span text:style-name="T1"> </text:span><text:span text:style-name="T2">(8/24) </text:span> ⲛ̅ⲧⲙⲉ· ⲁⲩⲱ ⲁ̣[ϥⲉⲓⲱⲣⲙ̅ ϩⲙ̅ ⲡⲧⲣⲉϥ̣]‐ <text:line-break/><text:span text:style-name="T1"> </text:span><text:span text:style-name="T2">(8/25) </text:span> ⲉⲓⲱⲣⲙ̅ ⲇⲉ̣ [ⲁⲥϭⲱⲗⲡ̅’ ⲉⲃⲟⲗ ⲛ̅ϭⲓ ⲧⲙⲉ] <text:line-break/><text:span text:style-name="T1"> </text:span><text:span text:style-name="T2">(8/26) </text:span> ⲁⲩⲱ ⲁⲩⲁϩ̣[ⲉⲣⲁⲧⲟⲩ ⲁⲩϯ ⲉⲟⲟⲩ ⲙ̅]‐ <text:line-break/><text:span text:style-name="T1"> </text:span><text:span text:style-name="T2">(8/27) </text:span> ⲡⲁϩⲟⲣⲁⲧⲟ[ⲛ ⲙ̅ⲡ̅ⲛ̅ⲁ̅ ⲉⲧ’ϣⲏⲡ’] <text:line-break/><text:span text:style-name="T1"> </text:span><text:span text:style-name="T2">(8/28) </text:span> ⲙⲛ̅ ⲧⲉϥⲃ̅ⲁ̅[̅ⲣ̅ⲃ̅ⲏ̅ⲗ̅ⲱ̅ ⲧⲁⲓ̈ ⲉⲛⲧⲁⲩϣⲱⲡⲉ] <text:line-break/><text:span text:style-name="T1"> </text:span><text:span text:style-name="T2">(9/1) </text:span> [ⲉⲧⲃⲏⲏⲧⲥ̅] ⲧ̣ⲁⲓ̈ ⲧⲉ ⲧ̣ⲡ̣[ⲉⲛⲧⲁⲥ ⲛ̅]‐ <text:line-break/><text:span text:style-name="T1"> </text:span><text:span text:style-name="T2">(9/2) </text:span> [ⲛⲁⲓⲱⲛ ⲛ̅ⲧⲉ] ⲡⲓⲱⲧ’· ⲉ̣[ⲧⲉ ⲡⲁⲓ̈ ⲡⲉ] <text:line-break/><text:span text:style-name="T1"> </text:span><text:span text:style-name="T2">(9/3) </text:span> [ⲡϣⲟⲣⲡ̅’ ⲛ̅ⲣ]ⲱ̣ⲙⲉ· ⲑⲓ[ⲕⲱⲛ ⲙ̅ⲡⲓ]‐ <text:line-break/><text:span text:style-name="T1"> </text:span><text:span text:style-name="T2">(9/4) </text:span> [ⲁϩⲟⲣⲁⲧⲟⲥ ⲙ̅ⲡ̅]̅ⲛ̅ⲁ̅· ⲧ[ⲁⲓ̈ ⲧⲉ ⲧⲡⲣⲟ]‐ <text:line-break/><text:span text:style-name="T1"> </text:span><text:span text:style-name="T2">(9/5) </text:span> [ⲛⲟⲓⲁ ⲉⲧⲉ ⲧⲁⲓ̈ ⲧⲉ ⲃ̅ⲁ̅ⲣ̅ⲃ̅ⲏ̅ⲗ̅ⲱ̅· ⲁⲩⲱ] <text:line-break/><text:span text:style-name="T1"> </text:span><text:span text:style-name="T2">(9/6) </text:span> [ⲡⲙⲉⲉⲩⲉ ⲙⲛ̅ ⲧⲡⲣⲟⲅⲛⲱⲥⲓⲥ· ⲁⲩⲱ] <text:line-break/><text:span text:style-name="T1"> </text:span><text:span text:style-name="T2">(9/7) </text:span> [ⲧⲙ̅ⲛ̅ⲧ̅’̅ⲁ]ⲧ’ⲧⲁ[ⲕⲟ· ⲁⲩⲱ ⲡⲱⲛϩ̅ ⲛ̅ϣⲁ] <text:line-break/><text:span text:style-name="T1"> </text:span><text:span text:style-name="T2">(9/8) </text:span> [ⲉⲛⲉϩ ⲁⲩⲱ ⲧⲙⲉ ⲧⲁ]ⲓ̣̈ ⲧ̣ⲉ̣ ⲧ̣ⲡ̣[ⲉⲛⲧⲁⲥ] <text:line-break/><text:span text:style-name="T1"> </text:span><text:span text:style-name="T2">(9/9) </text:span> [ⲛ̅ⲛⲁⲓⲱⲛ ⲛ̅ϩⲟⲟⲩ]ⲧ’ ⲥ{ϩ̅ⲓ}ⲙⲉ ⲉ[ⲧⲉ] <text:line-break/><text:span text:style-name="T1"> </text:span><text:span text:style-name="T2">(9/10) </text:span> [ⲧⲁⲓ̈ ⲧⲉ ⲧⲇⲉ]ⲕ̣ⲁ̣ⲥ̣ ⲛ̅ⲛⲁⲓⲱⲛ ⲉⲧⲉ ⲡ[ⲁⲓ̈] <text:line-break/><text:span text:style-name="T1"> </text:span><text:span text:style-name="T2">(9/11) </text:span> [ⲡⲉ ⲡⲓⲱⲧ’]· ⲁⲩⲱ ⲁϥϭⲱϣⲧ̅’ [ⲉ]‐ <text:line-break/><text:span text:style-name="T1"> </text:span><text:span text:style-name="T2">(9/12) </text:span> [ϩⲟⲩⲛ] ϩ̣ⲛ̣̅ ⲧⲃ̅ⲁ̅ⲣ̅ⲃ̅ⲏ̅ⲗ̅ⲱ̅ ϩⲙ̅ ⲡⲟⲩⲟ‐ <text:line-break/><text:span text:style-name="T1"> </text:span><text:span text:style-name="T2">(9/13) </text:span> [ⲉⲓⲛ ⲉⲧ’]ⲧⲃ̅ⲃⲏⲟⲩ ⲉⲧ’ⲕⲧⲏⲟⲩ ⲉⲡⲁ‐ <text:line-break/><text:span text:style-name="T1"> </text:span><text:span text:style-name="T2">(9/14) </text:span> [ϩⲟⲣⲁⲧ]ⲟ̣ⲛ ⲙ̅ⲡ̅ⲛ̅ⲁ̅ ⲙⲛ̅ ⲡⲉ̣[ϥ]ⲡⲣ̅ⲣⲉ <text:line-break/><text:span text:style-name="T1"> </text:span><text:span text:style-name="T2">(9/15) </text:span> [ⲁⲩⲱ] ⲁ̣ⲥϫⲉ ⲟⲩⲱ ⲉⲣⲟϥ ⲁ[ϥ]ϫⲡⲟ ⲛ̅‐ <text:line-break/><text:span text:style-name="T1"> </text:span><text:span text:style-name="T2">(9/16) </text:span> [ⲟ]ⲩ[ϯ]ⲕ ⲛ̅ⲟⲩⲟⲉⲓⲛ ϩⲛ̅ ⲟⲩⲟⲉⲓⲛ ⲙ̅‐ <text:line-break/><text:span text:style-name="T1"> </text:span><text:span text:style-name="T2">(9/17) </text:span> [ⲙⲛ̅]̅ⲧ̅’̅ⲙⲁⲕⲁⲣⲓⲟⲥ ⲛ̅ⲉⲓⲛⲉ ⲉϥ̣ϣⲏ[ϣ] <text:line-break/><text:span text:style-name="T1"> </text:span><text:span text:style-name="T2">(9/18) </text:span> [ⲇⲉ ⲁⲛ] ⲙⲛ̅ ⲧⲉϥⲙ̅ⲛ̅ⲧ̅’̅ⲛⲟϭ· ⲡ̣ⲁ̣ⲓ̣̈ <text:line-break/><text:span text:style-name="T1"> </text:span><text:span text:style-name="T2">(9/19) </text:span> [ⲛⲉⲟ]ⲩϣⲣ̅ⲟⲩⲱⲧ’ ⲡⲉ ⲛ̅ⲧⲙ̣ⲏⲧⲣ[ⲟ]‐ <text:line-break/><text:span text:style-name="T1"> </text:span><text:span text:style-name="T2">(9/20) </text:span> [ⲡⲁ]ⲧ̣ⲱⲣ ⲉⲁϥⲟⲩⲱⲛϩ̅ ⲉⲃⲟⲗ ⲉⲧⲉ <text:line-break/><text:span text:style-name="T1"> </text:span><text:span text:style-name="T2">(9/21) </text:span> [ⲡⲁⲓ̈] ⲡⲉ ⲡⲉϫⲡⲟ ⲟⲩⲁⲁϥ· ⲡϣ[ⲣ̅]‐ <text:line-break/><text:span text:style-name="T1"> </text:span><text:span text:style-name="T2">(9/22) </text:span> [ⲟⲩ]ⲱ̣ⲧ’ ⲛ̅ⲧⲉ ⲡⲓⲱⲧ’ ⲡⲟⲩⲟⲉⲓ̣[ⲛ] <text:line-break/><text:span text:style-name="T1"> </text:span><text:span text:style-name="T2">(9/23) </text:span> [ⲉⲧ’]ⲧⲃ̅ⲃⲏⲟⲩ· ⲁϥⲧⲉⲗⲏⲗ ⲇⲉ ⲛ̅ϭⲓ <text:line-break/><text:span text:style-name="T1"> </text:span><text:span text:style-name="T2">(9/24) </text:span> [ⲡ]ⲁ̣ϩⲟⲣⲁⲧⲟⲛ ⲙ̅ⲡⲁⲣⲑⲉⲛⲓⲕⲟⲛ <text:line-break/><text:span text:style-name="T1"> </text:span><text:span text:style-name="T2">(9/25) </text:span> [ⲙ̅ⲡ̅]̅ⲛ̅ⲁ̅ ⲉϩⲣⲁⲓ̈ ⲉϫⲙ̅ ⲡⲟⲩⲟⲉⲓⲛ <text:line-break/><text:span text:style-name="T1"> </text:span><text:span text:style-name="T2">(9/26) </text:span> [ⲉⲧⲁ]ϩϣⲱⲡⲉ· ⲡⲉⲛⲧⲁϥⲣ̅ϣⲣⲡ̅’ <text:line-break/><text:span text:style-name="T1"> </text:span><text:span text:style-name="T2">(9/27) </text:span> [ⲛ̅ⲟ]ⲩⲱⲛϩ̅ ⲉⲃⲟⲗ’ ⲉⲃⲟⲗ ϩⲛ̅ ⲧϣⲟ‐ <text:line-break/><text:span text:style-name="T1"> </text:span><text:span text:style-name="T2">(9/28) </text:span> [ⲣⲡ’] ⲛ̣̅[ϭⲟ]ⲙ̣ ⲛ̅ⲧⲉϥⲡⲣⲟⲛⲟⲓⲁ ⲉⲧⲉ <text:line-break/><text:span text:style-name="T1"> </text:span><text:span text:style-name="T2">(10/1) </text:span> [ⲧⲁⲓ̈ ⲧⲉ] ⲧⲃⲁⲣⲃⲏⲗⲱ̣ [ⲁⲩⲱ ⲁϥⲧⲱϩⲥ̅] <text:line-break/><text:soft-page-break/><text:span text:style-name="T1"> </text:span><text:span text:style-name="T2">(10/2) </text:span> [ⲙ̅ⲙⲟϥ] ⲉⲃⲟⲗ ϩⲛ̅ ϯ[ⲙ̅ⲛ̅ⲧ̅’̅ⲭ̅ⲣ̅ⲥ̅ ⲛ̅ⲧⲁϥ] <text:line-break/><text:span text:style-name="T1"> </text:span><text:span text:style-name="T2">(10/3) </text:span> [ϣⲁⲛⲧⲉ]ϥϣⲱ[ⲡⲉ ⲛ̅ⲧⲉⲗⲓⲟⲥ ⲉⲛϥ̅ϣⲁ]‐ <text:line-break/><text:span text:style-name="T1"> </text:span><text:span text:style-name="T2">(10/4) </text:span> [ⲁⲧ’ ⲛ̅ⲗⲁⲁ]ⲩ ⲁ̣ⲛ ⲙ̣̅[ⲙ̅ⲛ̅ⲧ̅’̅ⲭ̅ⲣ̅ⲥ̅ ⲉⲃⲟⲗ ϫⲉ] <text:line-break/><text:span text:style-name="T1"> </text:span><text:span text:style-name="T2">(10/5) </text:span> [ⲁϥⲧⲁϩⲥϥ̅ ⲛ̅ϩⲣⲁⲓ̈ ϩⲛ̅ ⲧⲙ̅ⲛ̅ⲧ̅’̅ⲭ̅ⲣⲥ̅] <text:line-break/><text:span text:style-name="T1"> </text:span><text:span text:style-name="T2">(10/6) </text:span> [ⲙ̅ⲡⲁϩⲟⲣⲁⲧⲟⲥ ⲙ̅ⲡ̅]̅ⲛ̅ⲁ̣̅̅[ⲁⲩⲱ ⲁϥⲁϩⲉ]‐ <text:line-break/><text:span text:style-name="T1"> </text:span><text:span text:style-name="T2">(10/7) </text:span> [ⲣⲁⲧϥ̅ ⲙ̅ⲡⲉϥⲙ̅ⲧⲟ] ⲉⲃ̣ⲟ̣[ⲗ ⲉϥϣⲟⲩⲟ] <text:line-break/><text:span text:style-name="T1"> </text:span><text:span text:style-name="T2">(10/8) </text:span> [ⲉϫⲱ]ϥ̣· ϩⲛ̣̅ ⲧ̣[ⲉⲩⲛⲟⲩ ⲇⲉ ⲛ̅ⲧⲁⲣⲉϥ]‐ <text:line-break/><text:span text:style-name="T1"> </text:span><text:span text:style-name="T2">(10/9) </text:span> [ϫⲓ] ⲉ̣ⲃⲟⲗ {ϩ̅ⲓ}ⲧⲛ̅ [ⲡⲉⲡ̅ⲛⲁ̅ ⲁϥϯ ⲉⲟⲟⲩ] <text:line-break/><text:span text:style-name="T1"> </text:span><text:span text:style-name="T2">(10/10) </text:span> [ⲙ̣̅]ⲡⲉⲡ̅ⲛ̅ⲁ̅ ⲉⲧⲟⲩⲁ̣ⲁ[ⲃ ⲁⲩⲱ ⲧⲉⲡⲣⲟ]‐ <text:line-break/><text:span text:style-name="T1"> </text:span><text:span text:style-name="T2">(10/11) </text:span> [ⲛ]ⲟⲓⲁ ⲉⲧ’ϫⲏⲕ ⲉⲃⲟⲗ ⲧ̣[ⲁⲓ̈ ⲉⲧⲁϥϭⲱⲗⲡ̅’] <text:line-break/><text:span text:style-name="T1"> </text:span><text:span text:style-name="T2">(10/12) </text:span> ⲉⲃⲟⲗ ⲉⲧⲃⲏⲧⲥ̅· ⲁⲩⲱ ⲁ[ϥⲣ̅ⲁⲓⲧⲉⲓ ⲉ]‐ <text:line-break/><text:span text:style-name="T1"> </text:span><text:span text:style-name="T2">(10/13) </text:span> ϯ ⲛⲁϥ ⲛ̅ⲟⲩϣⲃ̅ⲣ̅ ⲣ̅ ϩⲱⲃ ⲉ[ⲧⲉ ⲡⲛⲟⲩⲥ] <text:line-break/><text:span text:style-name="T1"> </text:span><text:span text:style-name="T2">(10/14) </text:span> ⲡⲉ· ⲁⲩ̣ⲱ ⲁϥⲉⲓⲱⲣⲙ̅ ϩⲛ̅ ⲟⲩ[......] <text:line-break/><text:span text:style-name="T1"> </text:span><text:span text:style-name="T2">(10/15) </text:span> ϩ̣ⲙ̣̅ ⲡ̣[ⲧⲣ]ⲉϥⲉⲓⲱⲣⲙ̅ ⲇⲉ ⲛ̅ϭⲓ [ⲡ]ⲁϩ̣[ⲟⲣⲁ]‐ <text:line-break/><text:span text:style-name="T1"> </text:span><text:span text:style-name="T2">(10/16) </text:span> ⲧⲟⲛ ⲙ̅ⲡ̅ⲛ̅ⲁ̅ ⲁϥϭⲱⲗⲡ̅’ ⲉⲃⲟⲗ ⲛ̅ϭ[ⲓ ⲡⲛⲟⲩⲥ] <text:line-break/><text:span text:style-name="T1"> </text:span><text:span text:style-name="T2">(10/17) </text:span> ⲁⲩⲱ ⲁϥⲁϩⲉⲣⲁⲧϥ̅ ⲙⲛ̅ ⲡⲉⲭ̅[̅ⲣ̅ⲥ̅ ⲉϥϯ] <text:line-break/><text:span text:style-name="T1"> </text:span><text:span text:style-name="T2">(10/18) </text:span> [ⲉⲟⲟⲩ] ⲛⲁϥ ⲙⲛ̅ ⲧⲃⲁⲣⲃⲏⲗⲱ [ⲛⲁⲓ̈ ⲇⲉ] <text:line-break/><text:span text:style-name="T1"> </text:span><text:span text:style-name="T2">(10/19) </text:span> [ⲧⲏⲣⲟ]ⲩ ⲉⲧⲁϩϣⲱⲡⲉ ϩⲛ̅ ⲟⲩ[ⲙ̅ⲛ̅ⲧ̅’̅]‐ <text:line-break/><text:span text:style-name="T1"> </text:span><text:span text:style-name="T2">(10/20) </text:span> ⲕⲁⲣⲱϥ· ⲁⲩⲱ ⲡⲙⲉⲉⲩⲉ ⲁϥ̣[ⲟⲩⲱ]‐ <text:line-break/><text:span text:style-name="T1"> </text:span><text:span text:style-name="T2">(10/21) </text:span> ϣⲉ {ϩ̅ⲓ}ⲧⲛ̅ ⲡϣⲁϫⲉ ⲙ̅ⲡⲁϩⲟ[ⲣⲁⲧⲟⲛ] <text:line-break/><text:span text:style-name="T1"> </text:span><text:span text:style-name="T2">(10/22) </text:span> ⲙ̣̅ⲡ̅ⲛ̅ⲁ̅ ⲉⲧⲁⲙⲓⲟ ⲛ̅ⲟⲩϩⲱⲃ [ⲁⲩⲱ] <text:line-break/><text:span text:style-name="T1"> </text:span><text:span text:style-name="T2">(10/23) </text:span> ⲡⲉϥⲟⲩⲱϣⲉ ⲁϥϣⲱⲡⲉ ⲛ̅[ⲟⲩⲉⲣ]‐ <text:line-break/><text:span text:style-name="T1"> </text:span><text:span text:style-name="T2">(10/24) </text:span> ⲅⲟⲛ ⲁⲩⲱ ⲁϥϭⲱⲗⲡ̅’ ⲉⲃⲟⲗ ⲛ̅[ϭⲓ ⲡⲛⲟⲩⲥ] <text:line-break/><text:span text:style-name="T1"> </text:span><text:span text:style-name="T2">(10/25) </text:span> ⲁⲩⲱ ⲡⲟⲩⲟⲉⲓⲛ ⲉϥϯ ⲉⲟⲟⲩ̣ [ⲛⲁϥ] <text:line-break/><text:span text:style-name="T1"> </text:span><text:span text:style-name="T2">(10/26) </text:span> ⲁⲩⲱ ⲡϣⲁϫⲉ ⲁϥⲟⲩⲁϩϥ̅ ⲛ̅ⲥ̣[ⲁ ⲡⲟⲩ]‐ <text:line-break/><text:span text:style-name="T1"> </text:span><text:span text:style-name="T2">(10/27) </text:span> ⲱϣⲉ· ⲉⲧⲃⲉ ⲡϣⲁϫⲉ ⲅⲁⲣ ⲁ̣[ϥⲧⲁ]‐ <text:line-break/><text:span text:style-name="T1"> </text:span><text:span text:style-name="T2">(10/28) </text:span> ⲙⲓⲟ ⲙ̅ⲡⲧⲏⲣϥ̅ ⲛ̅ϭⲓ ⲡⲉⲭ̣̅̅[̅ⲣ̅ⲥ̅ ⲡⲁⲩⲧⲟ]‐ <text:line-break/><text:span text:style-name="T1"> </text:span><text:span text:style-name="T2">(10/29) </text:span> ⲅⲉⲛⲏⲥ ⲛ̅ⲛⲟⲩⲧⲉ· [ⲡⲱⲛϩ̅ ⲇⲉ ϣⲁ]‐ <text:line-break/><text:span text:style-name="T1"> </text:span><text:span text:style-name="T2">(11/1) </text:span> [ⲉⲛⲉϩ ϩⲙ̅ ⲡⲉ]ϥⲟⲩⲱϣ· ⲁⲩⲱ <text:line-break/><text:span text:style-name="T1"> </text:span><text:span text:style-name="T2">(11/2) </text:span> [ⲡⲛⲟⲩⲥ ⲙⲛ̅] ⲧⲡⲣⲟⲅⲛⲱⲥ̣[ⲓⲥ] <text:line-break/><text:span text:style-name="T1"> </text:span><text:span text:style-name="T2">(11/3) </text:span> [ⲁⲩⲁϩⲉⲣⲁⲧⲟⲩ] ⲁ̣ⲩϯ ⲉⲟⲟⲩ ⲙ̅ⲡ[ⲁ]‐ <text:line-break/><text:span text:style-name="T1"> </text:span><text:span text:style-name="T2">(11/4) </text:span> [ϩⲟⲣⲁⲧⲟⲛ ⲙ̅ⲡ̅ⲛ̅]̅ⲁ̅ ⲙⲛ̅ ⲧⲃⲁⲣⲃⲏ‐ <text:line-break/><text:span text:style-name="T1"> </text:span><text:span text:style-name="T2">(11/5) </text:span> [ⲗⲱ ϫⲉ ⲉⲧⲃⲏⲧⲥ̅ ⲅ]ⲁⲣ ⲁⲩϣⲱⲡ[ⲉ] <text:line-break/><text:span text:style-name="T1"> </text:span><text:span text:style-name="T2">(11/6) </text:span> [ⲁⲩⲱ ⲁϥϫⲱⲕ ⲉⲃ]ⲟⲗ [ⲛ̅ϭⲓ ⲡⲉⲡ̅ⲛ̅ⲁ̅] <text:line-break/><text:span text:style-name="T1"> </text:span><text:span text:style-name="T2">(11/7) </text:span> [ⲉⲧⲟⲩⲁⲁⲃ ⲙⲛ̅ ⲡⲁⲩⲧⲟⲅⲉⲛⲏⲥ ⲛ̅]‐ <text:line-break/><text:span text:style-name="T1"> </text:span><text:span text:style-name="T2">(11/8) </text:span> [ⲛⲟⲩⲧⲉ ⲡⲉϥϣⲏⲣⲉ ⲙⲛ̅ ⲧⲃⲁⲣ]‐ <text:line-break/><text:span text:style-name="T1"> </text:span><text:span text:style-name="T2">(11/9) </text:span> [ⲃⲏⲗⲱ {ϫⲉ ⲉⲧⲃ]ⲏⲧ[ⲥ̅ ⲅⲁⲣ ⲁⲩϣⲱ]‐ <text:line-break/><text:span text:style-name="T1"> </text:span><text:span text:style-name="T2">(11/10) </text:span> [ⲡⲉ· ⲁⲩⲱ ⲁ]ϥ̣ϫ̣ⲱⲕ̣ [ⲉⲃⲟⲗ ⲛ̅ϭⲓ ⲡⲉ] <text:line-break/><text:span text:style-name="T1"> </text:span><text:span text:style-name="T2">(11/11) </text:span> [ⲡ̅ⲛ̅ⲁ̅] ⲉ̣ⲧⲟⲩⲁⲁⲃ ⲙ[ⲛ̅ ⲡⲁⲩⲧⲟⲅⲉ]‐ <text:line-break/><text:span text:style-name="T1"> </text:span><text:span text:style-name="T2">(11/12) </text:span> [ⲛⲏⲥ ⲛ̅]ⲛⲟⲩⲧⲉ ⲡ̣[ⲉϥϣⲏⲣⲉ ⲙⲛ̅] <text:line-break/><text:span text:style-name="T1"> </text:span><text:span text:style-name="T2">(11/13) </text:span> [ⲧⲃⲁⲣ]ⲃⲏ[ⲗ]ⲱ} ⲉⲧ̣ⲣⲉ̣ϥⲁϩ̣[ⲉⲣⲁⲧϥ̅ ⲉ]‐ <text:line-break/><text:span text:style-name="T1"> </text:span><text:span text:style-name="T2">(11/14) </text:span> [ⲡⲛⲟϭ]· ⲁ[ⲩ]ⲱ ⲡⲁϩⲟⲣⲁⲧⲟ̣[ⲥ ⲙ̅ⲡⲁⲣ]‐ <text:line-break/><text:span text:style-name="T1"> </text:span><text:span text:style-name="T2">(11/15) </text:span> [ⲑⲉⲛⲓ]ⲕⲟⲛ ⲙ̅ⲡ̅ⲛ̅ⲁ̅ ⲙ̅ⲡⲁ[ⲩⲧⲟⲅⲉ]‐ <text:line-break/><text:span text:style-name="T1"> </text:span><text:span text:style-name="T2">(11/16) </text:span> [ⲛⲏⲥ] ⲛ̅ⲛⲟⲩⲧⲉ ⲡⲭ̅ⲣ̅ⲥ̅ ⲡ[ⲁⲓ̈ ⲉⲛ̅ⲧⲁϥ] <text:line-break/><text:span text:style-name="T1"> </text:span><text:span text:style-name="T2">(11/17) </text:span> [ⲧⲁⲉⲓ]ⲟϥ ϩⲛ̅ ⲟⲩⲛⲟϭ ⲛ̅ⲥⲙⲏ̣ [ⲁϥⲟⲩ]‐ <text:line-break/><text:span text:style-name="T1"> </text:span><text:span text:style-name="T2">(11/18) </text:span> [ⲱⲛϩ̅] ⲉⲃⲟⲗ {ϩ̅ⲓ}ⲧⲛ̅ ⲧⲡⲣⲟⲛⲟ̣[ⲓⲁ] <text:line-break/><text:span text:style-name="T1"> </text:span><text:span text:style-name="T2">(11/19) </text:span> [ⲁⲩⲱ] ⲁϥⲕⲱ ⲛ̅ϭⲓ ⲡⲁϩⲟⲣⲁⲧ̣ⲟ̣[ⲛ] <text:line-break/><text:soft-page-break/><text:span text:style-name="T1"> </text:span><text:span text:style-name="T2">(11/20) </text:span> [ⲙ̅ⲡ]ⲁ̣ⲣⲑⲉⲛⲓⲕⲟⲛ ⲙ̅ⲡ̅ⲛ̅ⲁ̅ ⲙⲛ̅ <text:line-break/><text:span text:style-name="T1"> </text:span><text:span text:style-name="T2">(11/21) </text:span> [ⲡⲁ]ⲩ̣ⲧⲟⲅⲉⲛⲏⲥ ⲛ̅ⲛⲟⲩⲧⲉ ⲙ̅ⲙ[ⲟϥ] <text:line-break/><text:span text:style-name="T1"> </text:span><text:span text:style-name="T2">(11/22) </text:span> [ⲉϫ]ⲙ̣̅ ⲡⲧⲏⲣϥ̅· ⲁⲩⲱ ⲁϥⲣ̅ϩⲩ‐ <text:line-break/><text:span text:style-name="T1"> </text:span><text:span text:style-name="T2">(11/23) </text:span> [ⲡⲟⲧ]ⲁⲥⲥⲉ ⲛⲁϥ ⲛ̅ⲧⲉⲝⲟⲩⲥⲓⲁ <text:line-break/><text:span text:style-name="T1"> </text:span><text:span text:style-name="T2">(11/24) </text:span> [ⲧⲏⲣⲥ̅·] ⲁⲩⲱ ⲧⲙⲉ ⲧⲁⲓ̈ ⲉⲧ’ϣ[ⲟ]‐ <text:line-break/><text:span text:style-name="T1"> </text:span><text:span text:style-name="T2">(11/25) </text:span> [ⲟⲡ’] ⲛ̣̅ϩⲏⲧϥ̅ ϫⲉⲕⲁⲁⲥ ⲉϥⲛⲁⲙ̅‐ <text:line-break/><text:span text:style-name="T1"> </text:span><text:span text:style-name="T2">(11/26) </text:span> [ⲙⲉ ⲉ]ⲡⲧⲏⲣϥ̅· ⲡⲁⲓ̈ ⲉⲛⲧⲁⲩ‐ <text:line-break/><text:span text:style-name="T1"> </text:span><text:span text:style-name="T2">(11/27) </text:span> [ⲙⲟⲩⲧⲉ] ⲉ̣[ⲣ]ⲟ̣ϥ̣ ⲛ̅ⲟⲩⲣⲁⲛ ⲉϥϫ[ⲟ]‐ <text:line-break/><text:span text:style-name="T1"> </text:span><text:span text:style-name="T2">(11/28) </text:span> [ⲥⲉ ⲉⲣⲁⲛ ⲛⲓ]ⲙ ⲡⲣⲁ[ⲛ ⲅ]ⲁ̣ⲣ̣ <text:line-break/><text:span text:style-name="T1"> </text:span><text:span text:style-name="T2">(12/1) </text:span> ⲉⲧⲙ̅ⲙⲁⲩ ⲥⲉ[ⲛⲁϫⲟⲟϥ ⲉⲛⲉⲧⲙ̅]‐ <text:line-break/><text:span text:style-name="T1"> </text:span><text:span text:style-name="T2">(12/2) </text:span> ⲡϣⲁ ⲙ̅ⲙⲟϥ [ⲉⲃⲟⲗ ⲅⲁⲣ ϩⲙ̅ ⲡⲟⲩ]‐ <text:line-break/><text:span text:style-name="T1"> </text:span><text:span text:style-name="T2">(12/3) </text:span> ⲟ̣ⲉⲓⲛ ⲉⲧⲉ [ⲡ]ⲁ̣[ⲓ̈ ⲡⲉ ⲡⲉⲭ̅ⲣ̅ⲥ̅ ⲁⲩⲱ] <text:line-break/><text:span text:style-name="T1"> </text:span><text:span text:style-name="T2">(12/4) </text:span> ⲧⲙ̅ⲛ̅ⲧ̅’̅ⲁⲧ’ⲧ[ⲁⲕⲟ {ϩⲓ}ⲧⲛ̅ ⲡϯ ⲙ̅ⲡⲉ]‐ <text:line-break/><text:span text:style-name="T1"> </text:span><text:span text:style-name="T2">(12/5) </text:span> ⲡ̅ⲛ̅ⲁ̅ ⲙⲛ̅ ⲡ[ⲓϥⲧⲟⲟⲩ ⲛ̅ⲛⲟϭ ⲙ̅ⲫⲱⲥ]‐ <text:line-break/><text:span text:style-name="T1"> </text:span><text:span text:style-name="T2">(12/6) </text:span> ⲧⲏⲣ ⲉⲃⲟ[ⲗ ϩⲙ̅ ⲡⲓⲁⲩⲧⲟⲅⲉⲛⲏⲥ] <text:line-break/><text:span text:style-name="T1"> </text:span><text:span text:style-name="T2">(12/7) </text:span> ⲛ̣̅[ⲛⲟⲩⲧⲉ ⲁϥϭⲱϣⲧ̅’ ⲉⲃⲟⲗ ⲉ]‐ <text:line-break/><text:span text:style-name="T1"> </text:span><text:span text:style-name="T2">(12/8) </text:span> [ⲧⲣⲟⲩⲱϩⲉ ⲉⲣⲁⲧⲟⲩ ⲉⲣⲟϥ] <text:line-break/><text:span text:style-name="T1"> </text:span><text:span text:style-name="T2">(12/9) </text:span> [ⲡϣⲟⲙⲧ̅’ ⲇⲉ ⲡⲟⲩⲱϣⲉ ⲧⲉⲛⲛⲟⲓⲁ] <text:line-break/><text:span text:style-name="T1"> </text:span><text:span text:style-name="T2">(12/10) </text:span> [ⲁⲩⲱ ⲡⲱⲛ]ϩ̣̅ [ⲧⲉϥⲧⲟ ⲇⲉ ⲛ̅ϭⲟⲙ] <text:line-break/><text:span text:style-name="T1"> </text:span><text:span text:style-name="T2">(12/11) </text:span> [ⲧⲙ̅ⲛ̅ⲧⲣ]ⲙⲛ̅[ϩⲏⲧ’ ⲧⲭⲁⲣⲓⲥ ⲧⲉⲥ]‐ <text:line-break/><text:span text:style-name="T1"> </text:span><text:span text:style-name="T2">(12/12) </text:span> [ⲑⲏⲥⲓⲥ ⲧ]ⲫⲣⲟⲛ[ⲏ]ⲥⲓ̣[ⲥ ⲧⲭⲁⲣⲓⲥ] <text:line-break/><text:span text:style-name="T1"> </text:span><text:span text:style-name="T2">(12/13) </text:span> [ⲇⲉ ⲉⲥϣ]ⲟ̣ⲟⲡ’ ϩⲁⲧⲙ̅ ⲡ[ⲁⲓⲱⲛ ⲙ̅]‐ <text:line-break/><text:span text:style-name="T1"> </text:span><text:span text:style-name="T2">(12/14) </text:span> [ⲫⲱⲥⲧⲏ]ⲣ ⲁⲣ̅ⲙ̅ⲟ̣̅̅ⲍ̅ⲏ̣̅̅[̅ⲗ̅ ⲉⲧⲉ] <text:line-break/><text:span text:style-name="T1"> </text:span><text:span text:style-name="T2">(12/15) </text:span> [ⲡⲁⲓ̈ ⲡ]ⲉ ⲡ̣ϣⲟ̣ⲣⲡ̅’ [ⲛ̅]ⲁⲅ[ⲅⲉⲗⲟⲥ] <text:line-break/><text:span text:style-name="T1"> </text:span><text:span text:style-name="T2">(12/16) </text:span> [ⲡⲓⲁⲓ]ⲱⲛ ⲇⲉ ⲥⲉⲛⲙ̣̅ⲙⲁ[ϥ ⲛ̅ϭⲓ ⲕⲉ]‐ <text:line-break/><text:span text:style-name="T1"> </text:span><text:span text:style-name="T2">(12/17) </text:span> [ϣⲟ]ⲙⲧ̅’ ⲛ̅ⲛⲉⲱⲛ ⲧⲭ[ⲁⲣⲓⲥ·] <text:line-break/><text:span text:style-name="T1"> </text:span><text:span text:style-name="T2">(12/18) </text:span> [ⲧⲙ]ⲉ· ⲧⲙⲟⲣⲫⲏ· ⲡⲙⲉ̣[ϩⲥⲛⲁⲩ] <text:line-break/><text:span text:style-name="T1"> </text:span><text:span text:style-name="T2">(12/19) </text:span> [ⲇⲉ] ⲙ̅ⲫⲱⲥⲧⲏⲣ ⲱ̅ⲣ̅ⲓ̅ⲁ̅[̅ⲏ̅ⲗ̅ ⲡⲉⲛ]‐ <text:line-break/><text:span text:style-name="T1"> </text:span><text:span text:style-name="T2">(12/20) </text:span> [ⲧⲁ]ⲩⲥⲁϩⲱϥ ⲉⲣⲁⲧϥ̅ ⲉϫⲙ̅ [ⲡⲙⲉϩ]‐ <text:line-break/><text:span text:style-name="T1"> </text:span><text:span text:style-name="T2">(12/21) </text:span> [ⲥ]ⲛⲁⲩ ⲛ̅ⲛⲉⲱⲛ· ⲥⲉⲛ[ⲙ̅ⲙⲁϥ] <text:line-break/><text:span text:style-name="T1"> </text:span><text:span text:style-name="T2">(12/22) </text:span> ⲇ̣ⲉ ⲛ̅ϭⲓ ⲕⲉϣⲟⲙⲧ̅’ ⲛ̅ⲛ̣[ⲁⲓⲱⲛ] <text:line-break/><text:span text:style-name="T1"> </text:span><text:span text:style-name="T2">(12/23) </text:span> ⲧⲉⲡⲓⲛⲟⲓⲁ· ⲧⲉⲥⲑⲏⲥⲓⲥ̣ [ⲡⲣ̅]‐ <text:line-break/><text:span text:style-name="T1"> </text:span><text:span text:style-name="T2">(12/24) </text:span> ⲡⲙⲉⲉⲩⲉ· ⲡⲙⲉϩϣⲟⲙ̣[ⲧ̅’ ⲡⲉ] <text:line-break/><text:span text:style-name="T1"> </text:span><text:span text:style-name="T2">(12/25) </text:span> ⲇⲉ ⲙ̅ⲫⲱⲥⲧⲏⲣ ⲛ̅ⲇ̅ⲁ̅ⲩ̅ⲉ̅[̅ⲓ̅ⲑ̅ⲁ̅ⲓ̅] <text:line-break/><text:span text:style-name="T1"> </text:span><text:span text:style-name="T2">(12/26) </text:span> ⲡⲁⲓ̈ ⲛ̅ⲧⲁϥⲥⲁϩⲱϥ ⲉⲣⲁ[ⲧϥ̅ ⲉϫⲙ̅] <text:line-break/><text:span text:style-name="T1"> </text:span><text:span text:style-name="T2">(12/27) </text:span> ⲡⲙⲉϩϣⲟⲙ̅ⲧ̅’̅ ⲛ̅ⲛⲉⲱ̣[ⲛ· ⲥⲉ] <text:line-break/><text:span text:style-name="T1"> </text:span><text:span text:style-name="T2">(12/28) </text:span> ⲛⲙ̅ⲙⲁϥ ⲇⲉ ⲛ̅ϭⲓ ⲕⲉϣⲟ̣[ⲙⲧ̅’] <text:line-break/><text:span text:style-name="T1"> </text:span><text:span text:style-name="T2">(12/29) </text:span> ⲛ̅ⲛⲁⲓⲱⲛ ⲧⲙ̅ⲛ̅ⲧⲣⲙ̅ⲛ̅ϩ[ⲏⲧ’] <text:line-break/><text:span text:style-name="T1"> </text:span><text:span text:style-name="T2">(12/30) </text:span> ⲧⲁⲅⲁⲡⲏ ϯⲇⲉⲁ· ⲡⲙ[ⲉϩϥⲧⲟ] <text:line-break/><text:span text:style-name="T1"> </text:span><text:span text:style-name="T2">(12/31) </text:span> ⲟⲩ ⲇ̣ⲉ ⲛ̅ⲛⲁⲓⲱ̣[ⲛ ⲁⲩⲧⲁϩⲟϥ ⲉ]‐ <text:line-break/><text:span text:style-name="T1"> </text:span><text:span text:style-name="T2">(12/32) </text:span> [ⲣⲁⲧϥ̅ ⲉϫ]ⲙ̣̅ ⲡⲙⲉϩ[ϥⲧⲟⲟⲩ ⲙ̅]‐ <text:line-break/><text:span text:style-name="T1"> </text:span><text:span text:style-name="T2">(13/1) </text:span> [ⲫⲱⲥⲧⲏⲣ ⲏ̅]̅ⲗ̅ⲏ̅ⲗ̅ⲏ̅ⲑ̅ ⲥⲉⲛⲙ̅ⲙ̣[ⲁϥ] <text:line-break/><text:span text:style-name="T1"> </text:span><text:span text:style-name="T2">(13/2) </text:span> [ⲇⲉ ⲛ̅ϭⲓ ⲕⲉϣ]ⲟⲙⲧ̅’ ⲛ̅ⲛⲁⲓ[ⲱⲛ ⲡ]‐ <text:line-break/><text:span text:style-name="T1"> </text:span><text:span text:style-name="T2">(13/3) </text:span> [ϫⲱⲕ ⲉⲃⲟⲗ ϯⲣ]ⲏⲛⲏ ⲧⲥⲟⲫ[ⲓⲁ] <text:line-break/><text:span text:style-name="T1"> </text:span><text:span text:style-name="T2">(13/4) </text:span> [ⲛⲁⲓ̈ ⲛⲉ ⲡϥⲧⲟⲟ]ⲩ ⲙ̅ⲫⲱⲥⲧ[ⲏⲣ] <text:line-break/><text:span text:style-name="T1"> </text:span><text:span text:style-name="T2">(13/5) </text:span> [ⲉⲧⲁϩⲉⲣⲁⲧⲟⲩ ⲉⲡ]ⲁ̣ⲩ[ⲧ]ⲟⲅⲉ[ⲛⲏⲥ] <text:line-break/><text:span text:style-name="T1"> </text:span><text:span text:style-name="T2">(14/1) </text:span> [ⲛ̅]ϭⲓ ⲡⲁϩⲟⲣⲁⲧⲟⲛ ⲛ̅ⲟ̣[ⲩϭⲟⲙ ⲛ̅ⲛⲟⲉⲣⲟⲛ] <text:line-break/><text:soft-page-break/><text:span text:style-name="T1"> </text:span><text:span text:style-name="T2">(14/2) </text:span> [ⲛ̅ⲛⲁ]ⲧ’ϫⲣⲟ ⲉⲣⲟⲥ· ⲁ̣[ⲩⲱ ⲁϥϫⲟⲟⲥ] <text:line-break/><text:span text:style-name="T1"> </text:span><text:span text:style-name="T2">(14/3) </text:span> [ⲁϥϯ ⲉ]ⲟⲟⲩ ⲁⲩⲱ̣ [ⲁϥⲥⲙⲟⲩ ⲉⲡⲁϩⲟ]‐ <text:line-break/><text:span text:style-name="T1"> </text:span><text:span text:style-name="T2">(14/4) </text:span> [ⲣⲁⲧ]ⲟ̣ⲛ ⲙ̅ⲡ̅ⲛ̅ⲁ̅ ⲉ̣[ϥϫⲱ ⲙ̅ⲙⲟⲥ ϫⲉ ⲉⲧ’]‐ <text:line-break/><text:span text:style-name="T1"> </text:span><text:span text:style-name="T2">(14/5) </text:span> [ⲃⲏ]ⲏⲧⲕ̅ ⲁⲡⲧⲏ[ⲣϥ̅ ϣⲱⲡⲉ ⲁⲩⲱ ⲉⲣ]‐ <text:line-break/><text:span text:style-name="T1"> </text:span><text:span text:style-name="T2">(14/6) </text:span> [ⲉⲡⲧ]ⲏ̣ⲣ̣[ϥ̅ ⲛⲁⲛⲁⲩϩϥ̅ ⲉⲣⲟⲕ ⲁⲛⲟⲕ] <text:line-break/><text:span text:style-name="T1"> </text:span><text:span text:style-name="T2">(15/1) </text:span> [ⲉⲃⲟⲗ ⲛ̅ϩⲏⲧⲥ̅] ⲙⲛ̅ ⲧⲉⲛⲑⲩⲙⲏⲥ̣[ⲓⲥ] <text:line-break/><text:span text:style-name="T1"> </text:span><text:span text:style-name="T2">(15/2) </text:span> [ⲙ̅ⲡⲁϩⲟⲣⲁⲧⲟ]ⲛ ⲙ̅ⲡ̅ⲛ̅ⲁ̅· ⲁ[ⲩⲱ ⲧⲡⲣⲟ]‐ <text:line-break/><text:span text:style-name="T1"> </text:span><text:span text:style-name="T2">(15/3) </text:span> [ⲅⲛⲱⲥⲓⲥ ⲁⲥⲟⲩⲱ]ϣⲉ ⲉⲟⲩⲱ̣[ⲛϩ̅ ⲉ]‐ <text:line-break/><text:span text:style-name="T1"> </text:span><text:span text:style-name="T2">(15/4) </text:span> [ⲃⲟⲗ ⲛ̅ⲟⲩⲉⲓⲛⲉ ⲛ̅ϩ]ⲏ̣ⲧⲥ̅ ⲉϫⲛ̅ ⲡ̣[ⲟⲩⲱ]‐ <text:line-break/><text:span text:style-name="T1"> </text:span><text:span text:style-name="T2">(15/5) </text:span> [ϣⲉ ⲙ̅ⲡⲉⲡ̅ⲛ̅ⲁ̅ ⲙ̅ⲡ]ⲉϥⲣ̅ⲥⲩⲛⲉ[ⲩⲇⲟⲕⲉⲓ] <text:line-break/><text:span text:style-name="T1"> </text:span><text:span text:style-name="T2">(15/6) </text:span> [ⲁⲩⲱ ⲉϫⲙ̅ ⲡⲉⲥϣ̅ⲃ̅ⲣ̅ ⲛ̅ϩⲱ]ⲧ̣[ⲣ̅ ⲁⲩⲱ] <text:line-break/><text:span text:style-name="T1"> </text:span><text:span text:style-name="T2">(16/1) </text:span> ⲛⲁⲩ ⲉⲣⲟϥ ϫⲉ ⲛ̅ⲧⲁ[ⲥⲧⲁⲙⲓⲟϥ ⲅⲁⲣ] <text:line-break/><text:span text:style-name="T1"> </text:span><text:span text:style-name="T2">(16/2) </text:span> [ϩ]ⲛ̅ ⲟⲩⲙ̅ⲛ̅ⲧ̅’̅ⲁⲧ’ⲥⲟ[ⲟⲩⲛ ⲁⲩⲱ ⲁⲥ]‐ <text:line-break/><text:span text:style-name="T1"> </text:span><text:span text:style-name="T2">(16/3) </text:span> [ⲕⲧⲟ ⲉ]ⲣⲟϥ ⲛ̅ⲟⲩ[ⲕ]ⲗ̣[ⲟⲟⲗⲉ ⲛ̅ⲟⲩⲟⲉⲓⲛ] <text:line-break/><text:span text:style-name="T1"> </text:span><text:span text:style-name="T2">(16/4) </text:span> [ⲁ]ⲩ̣ⲱ ⲁⲥⲕⲱ ⲛ̅[ⲟⲩⲑⲣⲟⲛⲟⲥ ϩⲛ̅ ⲧⲙⲏ]‐ <text:line-break/><text:span text:style-name="T1"> </text:span><text:span text:style-name="T2">(16/5) </text:span> [ⲧ]ⲉ ⲛ̅ⲧⲉⲕⲗⲟⲟⲗ̣[ⲉ ϫⲉⲕⲁⲁⲥ ⲛ̅ⲛⲉⲗⲁ]‐ <text:line-break/><text:span text:style-name="T1"> </text:span><text:span text:style-name="T2">(16/6) </text:span> [ⲁ]ⲩ ⲛⲁⲩ ⲉⲣⲟ[ϥ ⲉⲓⲙⲏⲧⲓ ⲉⲡⲉⲡ̅ⲛ̅ⲁ̅ <text:line-break/><text:span text:style-name="T1"> </text:span><text:span text:style-name="T2">(17/1) </text:span> [ⲉⲣⲟϥ ⲛ̅ϭⲓ] ⲛ̅ⲅⲉⲛⲉⲁ ⲛ̅ⲛ̅ⲣⲱⲙ[ⲉ] <text:line-break/><text:span text:style-name="T1"> </text:span><text:span text:style-name="T2">(17/2) </text:span> [ϫⲉ ⲡⲣⲏ· ⲡ]ⲙ̣ⲉ̣[ϩ]ⲥⲁϣϥ̅ ⲡ[ⲉ ⲁⲃⲉⲗ] <text:line-break/><text:span text:style-name="T1"> </text:span><text:span text:style-name="T2">(17/3) </text:span> [ⲡⲙⲉϩϣⲏ̅ ⲡⲉ ⲁ]ⲃⲣⲓⲥⲉⲛⲉ [ⲡⲙⲉϩ]‐ <text:line-break/><text:span text:style-name="T1"> </text:span><text:span text:style-name="T2">(17/4) </text:span> [ⲯⲓⲥ ⲡⲉ ⲓ̈ⲱⲃⲏⲗ] ⲡⲙⲁϩⲙⲏⲧ’ ⲡ̣[ⲉ] <text:line-break/><text:span text:style-name="T1"> </text:span><text:span text:style-name="T2">(17/5) </text:span> [ⲁ̅ⲣ̅ⲙ̅ⲟ̅ⲩ̅ⲡ̅ⲓ̅ⲉ̅ⲏ̅ⲗ̅· ⲡ]ⲙ̣ⲉϩⲙ̅ⲛ̅ⲧⲟ[ⲩⲉ] <text:line-break/><text:span text:style-name="T1"> </text:span><text:span text:style-name="T2">(17/17) </text:span> [ϫⲓⲧⲥ̅ ⲛ̅ⲧⲛ̅ ⲧⲉϥⲙⲁ]ⲁⲩ̣ [ⲛ̅ⲧⲟϥ] <text:line-break/><text:span text:style-name="T1"> </text:span><text:span text:style-name="T2">(17/18) </text:span> [ⲅⲁⲣ ⲟⲩⲕⲁⲕⲉ ⲛ̅]ⲁⲧⲥⲟⲟ[ⲩⲛ ⲡⲉ] <text:line-break/><text:span text:style-name="T1"> </text:span><text:span text:style-name="T2">(17/19) </text:span> [ⲡⲟⲩⲟⲉⲓⲛ ⲇⲉ ⲧ]ⲱϩ ⲙ̣ⲛ̣̅ [ⲡⲕⲁⲕⲉ] <text:line-break/><text:span text:style-name="T1"> </text:span><text:span text:style-name="T2">(17/20) </text:span> [ⲁϥⲧⲣⲉⲡⲕⲁⲕⲉ ⲡ̅ⲟ]ⲩ[ⲟⲉⲓⲛ] ⲡ̣[ⲕⲁⲕⲉ] <text:line-break/><text:span text:style-name="T1"> </text:span><text:span text:style-name="T2">(17/21) </text:span> [ⲇⲉ ⲛ̅ⲧⲁⲣⲉϥⲧⲱϩ ⲙⲛ̅ ⲡ]ⲟ̣ⲩⲟⲉⲓ̣[ⲛ] <text:line-break/><text:span text:style-name="T1"> </text:span><text:span text:style-name="T2">(17/22) </text:span> [ⲁϥϩⲧⲙ̅ⲧⲙ̅ ⲡⲟⲩⲟⲉⲓⲛ ⲁ]ⲩ̣[ⲱ ⲙ̅ⲡⲉϥ]‐ <text:line-break/><text:span text:style-name="T1"> </text:span><text:span text:style-name="T2">(17/23) </text:span> [ϣⲱⲡⲉ ⲛ̅ⲟⲩⲟⲉⲓⲛ] ⲟⲩⲧ̣[ⲉ ⲛ̅ⲕⲁⲕⲉ] <text:line-break/><text:span text:style-name="T1"> </text:span><text:span text:style-name="T2">(17/24) </text:span> [ⲁⲗⲗⲁ ⲁϥϣⲱ]ⲡ̣ⲉ ⲉϥϣⲟ̣[ⲛⲉ ⲡⲓ]‐ <text:line-break/><text:span text:style-name="T1"> </text:span><text:span text:style-name="T2">(17/25) </text:span> [ⲁⲣⲭⲱⲛ ϭⲉ ⲉⲧϣⲟⲛⲉ ⲟⲩⲛ̅ⲧⲁϥ] <text:line-break/><text:span text:style-name="T1"> </text:span><text:span text:style-name="T2">(17/26) </text:span> [ⲙ̅ⲙⲁⲩ ⲛ̅ϣⲟⲙ̅ⲧ’] ⲛ̣̅ⲣⲁ̣[ⲛ ⲡϣⲟⲣⲡ̅’ ⲛ̅]‐ <text:line-break/><text:span text:style-name="T1"> </text:span><text:span text:style-name="T2">(17/27) </text:span> [ⲣⲁⲛ ⲡⲉ ⲓ̅̈̅ⲁ̅ⲗ̅ⲧ̅ⲁ̅ⲃ̅]̅ⲁ̣̅̅ⲱ̅ⲑ̣̅̅ [ⲡ]ⲙⲉ̣[ϩⲥⲛⲁⲩ] <text:line-break/><text:span text:style-name="T1"> </text:span><text:span text:style-name="T2">(18/1) </text:span> [ⲡ]ⲉ̣ ⲥ̅ⲁ̅ⲕ̅ⲗ̅ⲁ̅ⲥ̅· ⲡⲙ[ⲉϩϣⲟⲙⲧ̅’ ⲡⲉ] <text:line-break/><text:span text:style-name="T1"> </text:span><text:span text:style-name="T2">(18/2) </text:span> [ⲥ̅ⲁ̅ⲙ̅ⲁ̅]̅ⲏ̅ⲗ· ⲡⲁⲓ̈ ⲇⲉ̣ ⲟ̣ⲩ[ϣⲁϥⲧⲉ ⲡⲉ ϩⲛ̅] <text:line-break/><text:span text:style-name="T1"> </text:span><text:span text:style-name="T2">(18/3) </text:span> [ⲧⲉϥⲁ]ⲡⲟⲛⲟⲓⲁ· [ⲧⲁⲓ̈ ⲉⲧϣⲟⲟⲡ’ ⲛ̅ϩⲣⲁⲓ̈] <text:line-break/><text:span text:style-name="T1"> </text:span><text:span text:style-name="T2">(18/4) </text:span> [ⲛ̅ϩ]ⲏⲧϥ̅· ⲁϥϫⲟⲟ̣[ⲥ ⲅⲁⲣ ϫⲉ ⲁⲛⲟⲕ ⲡⲉ] <text:line-break/><text:span text:style-name="T1"> </text:span><text:span text:style-name="T2">(18/5) </text:span> [ⲡⲛ]ⲟⲩⲧⲉ ⲁⲩⲱ [ⲙ̅ⲙⲛ̅ ⲕⲉⲛⲟⲩⲧⲉ] <text:line-break/><text:span text:style-name="T1"> </text:span><text:span text:style-name="T2">(18/6) </text:span> ϣ̣ⲟⲟⲡ’ ⲛ̅ⲥⲁ̣ⲃ̣[ⲗ̅ⲗⲁⲓ̈ ⲉϥⲟ ⲛ̅ⲁⲧⲥⲟⲟⲩⲛ] <text:line-break/><text:span text:style-name="T1"> </text:span><text:span text:style-name="T2">(18/17) </text:span> [ⲡⲉⲙⲉϩϥⲧ]ⲟ̣[ⲟⲩ ⲡⲉ ⲓ̅̈̅ⲁ̅ⲱ̅ ⲟⲩϩⲟ] <text:line-break/><text:span text:style-name="T1"> </text:span><text:span text:style-name="T2">(18/18) </text:span> [ⲛ̅ⲇⲣⲁⲕⲱ]ⲛ ⲡⲉ ⲉⲩ̣[ⲛ̅ⲧⲉϥ ⲥⲁϣϥⲉ] <text:line-break/><text:span text:style-name="T1"> </text:span><text:span text:style-name="T2">(18/19) </text:span> [ⲛ̅ⲁⲡⲉ ⲡ]ⲙⲉϩϯⲟ̣[ⲩ ⲡⲉ ⲥ̅ⲁ̅ⲃ̅ⲁ̅ⲱ̅ⲑ̅] <text:line-break/><text:span text:style-name="T1"> </text:span><text:span text:style-name="T2">(18/20) </text:span> [ⲟⲩϩⲟ ⲛ̅ⲇⲣⲁ]ⲕ̣[ⲱⲛ ⲡⲙⲉϩ]‐ <text:line-break/><text:span text:style-name="T1"> </text:span><text:span text:style-name="T2">(18/21) </text:span> [ⲥⲟⲟ]ⲩ̣ ⲡⲉ ⲁ[ⲇ̅ⲱ̅ⲛ̅ⲓ̅ⲛ̅ ⲟⲩϩⲟ ⲛ̅ⲏⲛⲉ] <text:line-break/><text:span text:style-name="T1"> </text:span><text:span text:style-name="T2">(18/22) </text:span> [ⲡⲉ ⲡⲙ]ⲉ̣[ϩⲥⲁϣϥ̅ ⲡⲉ ⲥⲁⲃⲃⲉⲇⲉ] <text:line-break/><text:span text:style-name="T1"> </text:span><text:span text:style-name="T2">(18/23) </text:span> [ⲟⲩϩⲟ ⲛ̅ⲕⲱ]ϩ̣ⲧ̅’̣ [ⲡⲉ ⲉϥϯ ⲟⲩⲟⲉⲓⲛ] <text:line-break/><text:span text:style-name="T1"> </text:span><text:span text:style-name="T2">(18/24) </text:span> [ⲧⲁⲓ̈ ⲧⲉ ⲧ]ⲑⲉⲃⲇⲟⲙ[ⲁⲥ ⲛ̅ⲧⲉ ⲡⲥⲁⲃ]‐ <text:line-break/><text:soft-page-break/><text:span text:style-name="T1"> </text:span><text:span text:style-name="T2">(18/25) </text:span> [ⲃⲁⲧⲟⲛ ⲓ̈]ⲁ̣̅̅ⲗ̅ⲧ̣̅̅ⲁ̣̅̅ⲃ̣̅̅ⲁ̅ⲱ̣̅̅[̅ⲑ̅ ⲇⲉ ⲛⲉⲟⲩⲛ̅]‐ <text:line-break/><text:span text:style-name="T1"> </text:span><text:span text:style-name="T2">(18/26) </text:span> [ⲧⲁϥ ⲙ̅ⲙⲁⲩ ⲛ̅ⲟⲩ]ⲙⲏ[ⲏϣⲉ ⲙ̅ⲡⲣⲟ]‐ <text:line-break/><text:span text:style-name="T1"> </text:span><text:span text:style-name="T2">(18/27) </text:span> [ⲥⲱⲡⲟⲛ ⲉϥ]ⲟⲩⲏϩ {ϩ̣̅̅ⲓ̣̅}[ϫⲱⲟⲩ ⲧⲏⲣ]‐ <text:line-break/><text:span text:style-name="T1"> </text:span><text:span text:style-name="T2">(18/28) </text:span> [ⲟⲩ ϩⲱ]ⲥⲧ̣[ⲉ ⲉⲧ]ⲣⲉϥⲉ̣[ⲓⲛⲉ ⲛ̅ⲟⲩϩⲟ] <text:line-break/><text:span text:style-name="T1"> </text:span><text:span text:style-name="T2">(19/1) </text:span> [ⲛⲁϩⲣⲁⲟⲩ ⲧ]ⲏⲣⲟⲩ ⲕⲁⲧⲁ ⲡⲉϥⲟⲩ[ⲱϣⲉ] <text:line-break/><text:span text:style-name="T1"> </text:span><text:span text:style-name="T2">(19/2) </text:span> [ⲉϥϣⲟⲟⲡ’ ϩⲛ̅] ⲧⲙⲏⲧⲉ ⲛ̅ⲛ̅ⲥ̣[ⲁⲣⲁⲫⲓⲛ] <text:line-break/><text:span text:style-name="T1"> </text:span><text:span text:style-name="T2">(19/3) </text:span> [ⲁϥⲡⲱϣⲉ ⲉϫ]ⲱⲟⲩ ⲉⲃⲟⲗ ϩⲙ̣̅ [ⲡⲉϥ]‐ <text:line-break/><text:span text:style-name="T1"> </text:span><text:span text:style-name="T2">(19/4) </text:span> [ⲕⲱϩⲧ̅’ ⲉⲧⲃⲉⲡ]ⲁ̣ⲓ̈ ⲁϥⲣ̅ ϫⲟⲉⲓⲥ [ⲉⲣ]ⲟ̣[ⲟⲩ] <text:line-break/><text:span text:style-name="T1"> </text:span><text:span text:style-name="T2">(19/5) </text:span> [ⲉⲧⲃⲉ ⲧϭⲟⲙ ⲙ̅ⲡ]ⲉ̣ⲟⲟⲩ ⲉⲧ’ϣⲟⲟⲡ’̣ <text:line-break/><text:span text:style-name="T1"> </text:span><text:span text:style-name="T2">(19/6) </text:span> [ⲛⲁϥ ⲛ̅ⲟⲩⲟⲉⲓⲛ ⲛ̅ⲧⲉ ⲧⲉϥⲙ]ⲁ̣[ⲁⲩ] <text:line-break/><text:span text:style-name="T1"> </text:span><text:span text:style-name="T2">(19/7) </text:span> [ⲉⲧⲃⲉ ⲡⲁⲓ̈ ⲁϥⲙⲟⲩⲧⲉ ⲉⲣⲟϥ ⲙ̅ⲙⲓⲛ] <text:line-break/><text:span text:style-name="T1"> </text:span><text:span text:style-name="T2">(19/8) </text:span> [ⲙ̅ⲙⲟϥ ϫⲉ ⲛⲟⲩⲧⲉ· ⲛⲉϥⲣ̅ⲡⲓⲑⲉ ⲇⲉ] <text:line-break/><text:span text:style-name="T1"> </text:span><text:span text:style-name="T2">(19/9) </text:span> [ⲁⲛ ⲉⲡⲙⲁ ⲉⲛ]ⲧ̣ⲁϥ̣{ⲉ̅ⲓ} [ϩⲣ]ⲁ̣ⲓ̣̈ ⲛ̅[ϩⲏⲧϥ̅] <text:line-break/><text:span text:style-name="T1"> </text:span><text:span text:style-name="T2">(19/10) </text:span> [ⲁⲩⲱ ⲁϥⲙⲟⲩ]ϫϭ̅ ⲙ̣[ⲛ̅ ⲛ̅]ⲉⲝ[ⲟⲩⲥⲓⲁ] <text:line-break/><text:span text:style-name="T1"> </text:span><text:span text:style-name="T2">(19/11) </text:span> [ⲉⲧ’ϣⲟ]ⲟ̣ⲡ’ [ϩ]ⲁ̣ⲣⲟϥ ⲛ̅ⲥⲁ[ϣϥⲉ ⲛ̅ϭⲟⲙ] <text:line-break/><text:span text:style-name="T1"> </text:span><text:span text:style-name="T2">(19/12) </text:span> [ⲛ̅ϩⲣⲁⲓ̈ ϩⲙ̅] ⲡ[ⲉ]ϥ̣ⲙⲉ[ⲉⲩ]ⲉ̣ ⲁ̣[ⲩⲱ ϩⲙ̅] <text:line-break/><text:span text:style-name="T1"> </text:span><text:span text:style-name="T2">(19/13) </text:span> [ⲡⲧ]ⲣ̣ⲉ̣[ϥ]ϫ̣ⲟⲟⲥ̣ ⲁⲩϣ[ⲱⲡⲉ ⲁⲩⲱ] <text:line-break/><text:span text:style-name="T1"> </text:span><text:span text:style-name="T2">(19/14) </text:span> [ⲁ]ϥϯ ⲣ[ⲁⲛ ⲉ]ⲧϭⲟⲙ ⲧϭ̣[ⲟⲙ ⲁϥⲣ̅ⲁⲣⲭⲉⲥ]‐ <text:line-break/><text:span text:style-name="T1"> </text:span><text:span text:style-name="T2">(19/15) </text:span> [ⲑ]ⲁⲓ [ϫⲛ̅] ⲙ̅ⲡⲥⲁⲛⲧ[ⲡⲉ ⲡϣⲟⲣⲡ̅’] <text:line-break/><text:span text:style-name="T1"> </text:span><text:span text:style-name="T2">(19/16) </text:span> ⲙ̣ⲉⲛ [ⲧⲉ] ⲧ̣ⲙ̅ⲛ̅ⲧ̅’̅ⲭ̅[̅ⲣ̅ⲥ̅] ϩ̣ⲁ̣[ⲧⲛ̅ ⲡϣⲟⲣⲡ̅’] <text:line-break/><text:span text:style-name="T1"> </text:span><text:span text:style-name="T2">(19/17) </text:span> ⲁ̅[̅ⲑ̅]̅ⲱ̅[̅ⲑ̅] ⲡⲙⲉϩⲥⲛⲁⲩ ⲧ[ⲉ ⲧⲡⲣⲟⲛⲟⲓⲁ] <text:line-break/><text:span text:style-name="T1"> </text:span><text:span text:style-name="T2">(19/18) </text:span> [ϩⲁ]ⲧⲛ̅ ⲡⲙⲉ̣[ϩ]ⲥ̣ⲛⲁⲩ ⲉ̅ⲗ̣̅̅ⲱ̣̅̅[̅ⲁ̅ⲓ̅ⲱ̅] <text:line-break/><text:span text:style-name="T1"> </text:span><text:span text:style-name="T2">(19/19) </text:span> [ⲡ]ⲙ̣ⲉϩϣⲟⲙⲉⲧ’ ⲇⲉ̣ [ⲡⲉ ⲁ̅ⲥ̅ⲧ̅]̅ⲣ̣̅̅ⲁ̣̅̅[̅ⲫ̅ⲁ̅ⲓ̅ⲱ̅] <text:line-break/><text:span text:style-name="T1"> </text:span><text:span text:style-name="T2">(19/20) </text:span> ⲡ̣ⲙⲉϩϥⲧⲟⲟⲩ ⲇⲉ ⲧ[ⲉ ⲧ]ⲙ̅ⲛ̅ⲧ̅’̅ϫ[ⲟⲉⲓⲥ] <text:line-break/><text:span text:style-name="T1"> </text:span><text:span text:style-name="T2">(19/21) </text:span> [ϩ̣ⲁⲧⲛ̅ ⲡⲙⲉϩϥⲧⲟⲟⲩ̣ [ⲓ̅̈̅ⲁ̅]̅ⲱ̅· ⲡ̣[ⲙⲉϩ]‐ <text:line-break/><text:span text:style-name="T1"> </text:span><text:span text:style-name="T2">(19/22) </text:span> ϯ̣ⲟⲩ ⲇⲉ ⲧⲉ ⲧⲙ̅ⲛ̅ⲧⲉⲣ[ⲟ ϩ]ⲁ[ⲧⲛ̅ ⲡⲙⲉϩ]‐ <text:line-break/><text:span text:style-name="T1"> </text:span><text:span text:style-name="T2">(19/23) </text:span> [ϯ̣]ⲟⲩ̣ ⲥ̅ⲁ̅ⲃ̅ⲁ̅ⲱ̅ⲑ̅· ⲧⲙⲉϩⲥ[ⲟ ⲡⲉ ⲡⲕⲱϩ] <text:line-break/><text:span text:style-name="T1"> </text:span><text:span text:style-name="T2">(19/24) </text:span> [ϩⲁⲧⲛ̅] ⲡⲙⲉϩⲥⲟⲟ̣ⲩ ⲁ̅ⲇ̅ⲱ̣̅̅[̅ⲛ̅ⲉ̅ⲓ̅ⲛ̅· ⲧⲙⲉϩ]‐ <text:line-break/><text:span text:style-name="T1"> </text:span><text:span text:style-name="T2">(19/25) </text:span> [ⲥⲁ]ϣϥⲉ ⲇⲉ ⲧⲉ̣ ⲧⲙⲛ̣̅̅[̅ⲧ̅’̅ⲣⲙ̅ⲛ̅ϩⲏⲧ’] <text:line-break/><text:span text:style-name="T1"> </text:span><text:span text:style-name="T2">(19/26) </text:span> [ϩⲁⲧⲛ̅] ⲡⲙ̣[ⲉ]ϩⲥⲁϣ[ϥ̅ ⲥ̅ⲁ̅ⲃ̅ⲃ̅ⲁ̅ⲧ̅ⲉ̅ⲱ̅ⲛ̅] <text:line-break/><text:span text:style-name="T1"> </text:span><text:span text:style-name="T2">(19/27) </text:span> [ⲛⲁⲓ̈ ⲇⲉ ⲟⲩⲛ̅]ⲧⲁⲩ [ⲙ̅]ⲙ̣ⲁⲩ [ⲛ̅ⲟⲩ]‐ <text:line-break/><text:span text:style-name="T1"> </text:span><text:span text:style-name="T2">(20/1) </text:span> ⲥ̣ⲧⲉⲣⲉⲱⲙⲁ ⲕⲁⲧⲁ [ⲡⲉ ⲛ̅ⲁⲓⲱⲛ] <text:line-break/><text:span text:style-name="T1"> </text:span><text:span text:style-name="T2">(20/2) </text:span> ⲛ̣ⲁ̣ⲓ̈ ⲙⲉⲛ ⲁⲩϯ ⲣⲁⲛ [ⲉⲣⲟⲟⲩ ⲕⲁⲧⲁ] <text:line-break/><text:span text:style-name="T1"> </text:span><text:span text:style-name="T2">(20/3) </text:span> [ⲡⲉⲟⲟ]ⲩ ⲛ̅ⲁⲧⲡⲉ [ⲉⲡϣⲟⲣϣⲣ̅ ⲛ̅ⲛⲓ]‐ <text:line-break/><text:span text:style-name="T1"> </text:span><text:span text:style-name="T2">(20/4) </text:span> [ϭⲟ]ⲙ· ⲛ̅ⲣⲁⲛ ⲇⲉ [ⲛ̅ⲧⲁⲩⲧⲁⲁⲩ ⲉⲣⲟⲟⲩ] <text:line-break/><text:span text:style-name="T1"> </text:span><text:span text:style-name="T2">(20/5) </text:span> [{ϩ̅ⲓ}]ⲧⲛ̅ ⲡⲟⲩⲁⲣⲭⲓⲅ̣[ⲉⲛⲉⲧⲱⲣ ⲉⲩⲣ̅ ϭⲟⲙ] <text:line-break/><text:span text:style-name="T1"> </text:span><text:span text:style-name="T2">(20/6) </text:span> ⲛ̣̅ϩⲣⲁⲓ̈ ⲛ̅ϩⲧⲟ̣[ⲩ ⲛ̅ⲣⲁⲛ ⲇⲉ ⲉⲧ’ⲧⲟ] <text:line-break/><text:span text:style-name="T1"> </text:span><text:span text:style-name="T2">(20/10) </text:span> [ⲧⲁⲩ] ⲙ̣̅[ⲙⲁⲩ] ⲛ̅ⲣⲁⲛ [ⲥⲛⲁⲩ ⲛ̅ⲕⲁ ⲇⲉ] <text:line-break/><text:span text:style-name="T1"> </text:span><text:span text:style-name="T2">(20/11) </text:span> [ⲛⲓⲙ] ⲉⲁϥ[ⲧⲁ]ⲙⲓⲟϥ ⲛ̅[ ⲁϥ]‐ <text:line-break/><text:span text:style-name="T1"> </text:span><text:span text:style-name="T2">(20/12) </text:span> [ⲧⲉⲛ]ⲟⲟ̣[ⲩ ⲕ]ⲁ̣ⲧⲁ ⲡⲓ̣[ⲛ]ⲉ ⲛ̣̅[ⲛ̅ϣⲟⲣⲡ̅’ ⲛ̅ⲉ]‐ <text:line-break/><text:span text:style-name="T1"> </text:span><text:span text:style-name="T2">(20/13) </text:span> [ⲱⲛ ⲛ̅ⲧ]ⲁ̣ϩ̣ϣ̣ⲱⲡⲉ· [ϩ]ⲱ[ⲥⲧⲉ ⲉⲧⲣⲉϥ]‐ <text:line-break/><text:span text:style-name="T1"> </text:span><text:span text:style-name="T2">(20/14) </text:span> [ⲧⲁⲙⲓⲟ]ⲟ̣ⲩ [ⲙ̅]ⲡⲥⲙ ̣ⲧ’ ⲛ̣̅[ⲁⲧ’ⲧⲁⲕⲟ] <text:line-break/><text:span text:style-name="T1"> </text:span><text:span text:style-name="T2">(20/15) </text:span> [ⲟⲩⲭ ϩⲟⲧⲓ ⲛ̅]ⲧⲟϥ ϫⲉ ⲁϥⲛ[ⲁ]ⲩ ⲉⲛⲁ̣[ⲧ’]‐ <text:line-break/><text:span text:style-name="T1"> </text:span><text:span text:style-name="T2">(20/16) </text:span> [ⲧⲁⲕⲟ ⲁⲗⲗ]ⲁ ⲧϭⲟⲙ ⲉⲧ̣[ⲛ̅ϩⲏ]ⲧϥ̅ ⲧⲁ̣[ⲓ̈] <text:line-break/><text:span text:style-name="T1"> </text:span><text:span text:style-name="T2">(20/17) </text:span> [ⲛ̅ⲧⲁϥϫⲓⲧⲥ̅] ⲉⲃⲟⲗ {ϩ̅ⲓ}ⲧⲛ̅ [ⲧⲉ]ϥⲙⲁⲁ̣[ⲩ] <text:line-break/><text:span text:style-name="T1"> </text:span><text:span text:style-name="T2">(20/18) </text:span> [ⲉⲁⲥϫⲡⲟ ⲛ̅ϩ]ⲏ̣ⲧϥ̅ 〈ⲙ̅〉ⲡⲓⲛ[ⲉ ⲙ̅ⲡ]ⲧⲉ[ⲛⲟ] <text:line-break/><text:span text:style-name="T1"> </text:span><text:span text:style-name="T2">(20/19) </text:span> [ⲉϥⲛⲁⲩ] ⲇⲉ ⲉ̣ⲧ̣ⲕⲧⲓⲥⲓⲥ ⲉⲧⲕ[ⲱ]ⲧⲉ̣ <text:line-break/><text:soft-page-break/><text:span text:style-name="T1"> </text:span><text:span text:style-name="T2">(20/20) </text:span> [ⲉⲣⲟϥ] ⲁ̣ⲩⲱ ⲡⲁϣⲁ̣ⲓ̣̈ ⲛ̅ⲛ̅ⲁⲅⲅⲉⲗ̣[ⲟⲥ] <text:line-break/><text:span text:style-name="T1"> </text:span><text:span text:style-name="T2">(20/21) </text:span> [ⲉⲧⲕⲧⲏ]ⲟ̣[ⲩ] ⲉⲣⲟϥ· ⲛⲁⲓ̈ ⲛ̅ⲧⲁ[ⲩϣⲱ]‐ <text:line-break/><text:span text:style-name="T1"> </text:span><text:span text:style-name="T2">(20/22) </text:span> [ⲡⲉ] ⲉⲃ̣[ⲟⲗ ⲙ̅ⲙ]ⲟϥ ⲡⲉϫⲁϥ ⲛⲁⲩ ϫⲉ ⲁ‐ <text:line-break/><text:span text:style-name="T1"> </text:span><text:span text:style-name="T2">(20/23) </text:span> [ⲛⲟ]ⲕ ⲁⲛⲟ̣[ⲕ ⲟ]ⲩⲛⲟⲩⲧⲉ ⲛ̅ⲣⲉϥⲕⲱ[ϩ] <text:line-break/><text:span text:style-name="T1"> </text:span><text:span text:style-name="T2">(20/24) </text:span> [ⲁⲩ]ⲱ ⲙ̅ⲙ̣[ⲛ̅] ⲕ̣ⲉⲛⲟⲩⲧⲉ ⲛ̅ⲥⲁⲃⲗ̣̅ⲗⲁ[ⲓ̈] <text:line-break/><text:span text:style-name="T1"> </text:span><text:span text:style-name="T2">(20/25) </text:span> [ⲡⲁⲓ̈ ⲇ]ⲉ̣ ⲉ̣[ϥ]ⲧ̣ⲁⲩⲟ ⲙ̅ⲙⲟϥ ⲉϥⲣ̅ⲥⲏⲙⲁ̣[ⲛⲉ] <text:line-break/><text:span text:style-name="T1"> </text:span><text:span text:style-name="T2">(20/26) </text:span> [ⲛ̅ⲛ̅ⲁⲅⲅ]ⲉⲗⲟⲥ ⲉⲧ’ϣⲟⲟⲡ’ ϣⲁ̣ⲣ̣ⲟ[ϥ] <text:line-break/><text:span text:style-name="T1"> </text:span><text:span text:style-name="T2">(20/27) </text:span> [ⲇⲉ ⲟⲩⲛ̅] ⲕⲉⲛ̣ⲟⲩⲧⲉ̣ ϣⲟⲟⲡ’· [ⲉⲛⲉ ⲙ̅]‐ <text:line-break/><text:span text:style-name="T1"> </text:span><text:span text:style-name="T2">(20/28) </text:span> [ⲙⲛ̅ ⲕⲉⲟⲩⲁ ⲅ]ⲁ̣ⲣ ϣⲟ̣ⲟⲡ’ ⲛⲉ ⲛⲓ̣[ⲙ ⲡⲉ] <text:line-break/><text:span text:style-name="T1"> </text:span><text:span text:style-name="T2">(20/29) </text:span> [ⲧϥ̅ⲛⲁⲕⲱϩ ⲉ]ⲣ̣ⲟϥ· ⲁ[ⲥ]ⲣ̣̅ⲁⲣ̣[ⲭⲉⲥⲑⲉ] <text:line-break/><text:span text:style-name="T1"> </text:span><text:span text:style-name="T2">(20/30) </text:span> [ϭⲉ ⲛ̅]ϣ[ⲉ]ⲉ̣[ⲓ] ⲛ̣̅ϭⲓ ⲧⲙ[ⲁⲁⲩ ⲁⲥⲙ̅ⲙⲉ] <text:line-break/><text:span text:style-name="T1"> </text:span><text:span text:style-name="T2">(20/31) </text:span> [ⲉⲡ]ϣⲧⲁ ϩⲙ̣̅ ⲡⲧⲣⲉ̣[ϥϭⲱϫⲃ̅ ⲛ̅ϭⲓ ⲡⲣ̅ⲣⲓⲉ] <text:line-break/><text:span text:style-name="T1"> </text:span><text:span text:style-name="T2">(21/1) </text:span> ⲙ̅ⲡⲉ̣[ⲥ]ⲟⲩ̣[ⲟ]ⲉⲓⲛ· ⲁⲩⲱ ⲁⲥϩⲧ̣[ⲟⲙϩⲧⲙ̅] <text:line-break/><text:span text:style-name="T1"> </text:span><text:span text:style-name="T2">(21/2) </text:span> ⲉⲃⲟⲗ ϫⲉ̣ [ⲙ̅]ⲡ̣ⲉϥⲣ̅ⲥⲩⲙⲫⲱ̣[ⲛⲉ ⲛⲙ̅ⲙⲁⲥ] <text:line-break/><text:span text:style-name="T1"> </text:span><text:span text:style-name="T2">(21/3) </text:span> [ⲛ̅ϭⲓ] ⲡ̣ⲉ̣[ⲥϣⲃⲏⲣ] ⲛ̣̅ϩⲱⲧⲣ̅· ⲁⲛⲟ[ⲕ ⲇⲉ ⲡⲉ]‐ <text:line-break/><text:span text:style-name="T1"> </text:span><text:span text:style-name="T2">(21/4) </text:span> [ϫⲁⲓ̈] ϫⲉ [ⲡϫⲟⲉⲓⲥ] ⲟⲩ ⲡⲉ ⲁⲥϣⲉ[ⲉ]ⲓ̣· <text:line-break/><text:span text:style-name="T1"> </text:span><text:span text:style-name="T2">(21/5) </text:span> [ⲛ̅]ⲧ̣ⲟϥ ⲇ̣[ⲉ ⲁϥⲥⲱⲃ]ⲉ ⲡⲉϫⲁϥ ϫⲉ ⲙ̅ⲡ[ⲣ̅]‐ <text:line-break/><text:span text:style-name="T1"> </text:span><text:span text:style-name="T2">(21/6) </text:span> [ⲙ]ⲉ̣ⲉⲩⲉ ϫⲉ ⲕ̣[ⲁⲧⲁ ⲑⲉ ⲉⲛⲧⲁϥϫⲟⲟⲥ] <text:line-break/><text:span text:style-name="T1"> </text:span><text:span text:style-name="T2">(21/7) </text:span> [ⲛ̅]ϭ̣ⲓ ⲙ[ⲱⲩ̈ⲥⲏⲥ {ϩ̅[̅ⲓ}ϫⲛ̅ ⲙ̅ⲙⲟⲩⲉⲓⲟⲟⲩⲉ] <text:line-break/><text:span text:style-name="T1"> </text:span><text:span text:style-name="T2">(21/8) </text:span> [ⲙ̅ⲙ]ⲁ̣[ⲛ] ⲁⲗ̣ⲗ̣ⲁ [ⲛ̅]ⲧ̣ⲉ̣[ⲣⲉⲥⲛⲁⲩ ⲉⲧⲕⲁ]‐ <text:line-break/><text:span text:style-name="T1"> </text:span><text:span text:style-name="T2">(21/9) </text:span> [ⲕⲓⲁ ⲉⲛ]ⲧ̣ⲁⲥ[ϣ]ⲱⲡⲉ ⲁ̣[ⲩⲱ ⲡϫⲓ ⲉⲃⲟⲗ ⲛ̅]‐ <text:line-break/><text:span text:style-name="T1"> </text:span><text:span text:style-name="T2">(21/10) </text:span> [ⲧⲁϥϫⲓ]ⲧ̣ϥ̣̅ ⲛ̅ϭ̣[ⲓ] ⲡⲉⲥϣ̣[ⲏⲣⲉ ⲁⲥⲣ̅ⲙⲉⲧⲁ]‐ <text:line-break/><text:span text:style-name="T1"> </text:span><text:span text:style-name="T2">(21/11) </text:span> [ⲛⲟⲉⲓ] ⲁⲩⲱ ⲁⲩⲃ̅ϣ[ⲉ ϣⲱⲡⲉ ⲛⲁⲥ]‐ <text:line-break/><text:span text:style-name="T1"> </text:span><text:span text:style-name="T2">(21/12) </text:span> [ϩⲙ̅ ⲡ̣ⲕ̣ⲁ̣ⲕⲉ ⲛ̅ⲧⲙ̅ⲛ̅ⲧ̅’̣̅̅[ⲁⲧⲥⲟⲟⲩⲛ ⲁⲩⲱ] <text:line-break/><text:span text:style-name="T1"> </text:span><text:span text:style-name="T2">(21/13) </text:span> [ⲁ]ⲥ̣[ⲣ̅]ⲁ̣ⲣ̣ϫⲉⲓ ⲛ̅ϣⲓⲡⲉ ⲙ̣̅[ⲡⲉⲥⲣ̅ⲧⲟⲗⲙⲁ] <text:line-break/><text:span text:style-name="T1"> </text:span><text:span text:style-name="T2">(21/14) </text:span> [ⲇ]ⲉ ⲉⲕⲧ̣ⲟ̣ⲥ· ⲁⲗⲗⲁ ⲛ̣[ⲉⲥⲙⲟⲟϣⲉ̣ ϩⲛ̅] <text:line-break/><text:span text:style-name="T1"> </text:span><text:span text:style-name="T2">(21/15) </text:span> [ⲟ]ⲩⲕⲓ̣ⲙ̣ ⲡⲕⲓⲙ ⲇⲉ ⲡ̣[ⲉ ⲡϣⲉⲉⲓ ⲁϥ]‐ <text:line-break/><text:span text:style-name="T1"> </text:span><text:span text:style-name="T2">(21/16) </text:span> [ϫ]ⲓ̣ ⲇⲉ ⲛ̅[ϭ]ⲓ ⲡⲁⲩⲑⲁ̣[ⲇⲏ]ⲥ̣ [ⲛ̅ⲟⲩϭⲟⲙ] <text:line-break/><text:span text:style-name="T1"> </text:span><text:span text:style-name="T2">(21/17) </text:span> ⲉⲃⲟ̣ⲗ {ϩ̅ⲓ}ⲧⲛ̅ ⲧⲉϥⲙⲁⲁⲩ ⲛⲉϥ̣ⲟ̣ [ⲅⲁⲣ ⲛ̅]‐ <text:line-break/><text:span text:style-name="T1"> </text:span><text:span text:style-name="T2">(21/18) </text:span> ⲁ̣ⲧ̣ⲥⲟⲟⲩⲛ· ⲉϥⲙⲉⲉⲩⲉ ⲅⲁⲣ [ϫⲉ ⲙ̅ⲙⲛ̅] <text:line-break/><text:span text:style-name="T1"> </text:span><text:span text:style-name="T2">(21/19) </text:span> [ⲕ]ⲉ ϣ̣ⲟⲟⲡ’ ⲉⲓⲙⲏⲧⲓ [ⲉⲧⲉϥⲙ]ⲁ[ⲁⲩ] <text:line-break/><text:span text:style-name="T1"> </text:span><text:span text:style-name="T2">(21/20) </text:span> [ⲙ]ⲁⲩⲁⲁⲥ· ⲉϥⲛⲁⲩ [ⲇⲉ] ⲉ̣ⲡⲁϣ[ⲁⲓ̈] <text:line-break/><text:span text:style-name="T1"> </text:span><text:span text:style-name="T2">(21/21) </text:span> [ⲛ̅]ⲛ̣ⲁⲅⲅⲉⲗⲟⲥ ⲛⲁⲓ̈ ⲉⲛ[ⲧⲁ]ϥⲥⲟⲛ[ⲧⲟⲩ] <text:line-break/><text:span text:style-name="T1"> </text:span><text:span text:style-name="T2">(21/22) </text:span> [ⲁ]ϥ̣ϫⲓⲥⲉ ϭⲉ ⲙ̅ⲙⲟϥ ⲉϩⲣⲁ[ⲓ̈] ⲉ̣[ϫⲱⲟⲩ] <text:line-break/><text:span text:style-name="T1"> </text:span><text:span text:style-name="T2">(21/23) </text:span> [ⲧ]ⲙ̣ⲁ̣ⲁⲩ ⲇⲉ ⲛ̅ⲧⲉⲣⲉⲥⲙ̅ⲙ[ⲉ ⲉⲧϩⲃ̅ⲥⲱ] <text:line-break/><text:span text:style-name="T1"> </text:span><text:span text:style-name="T2">(21/24) </text:span> [ⲙ̅]ⲡ̣ⲕⲁⲕⲉ ϫⲉ ⲙ̅ⲡⲉϥϣⲱ̣ⲡ̣[ⲉ ϩⲛ̅ ⲟⲩ]‐ <text:line-break/><text:span text:style-name="T1"> </text:span><text:span text:style-name="T2">(21/25) </text:span> [ϫ]ⲱ̣ⲕ ⲁⲥⲙ̅ⲙⲉ ϭⲉ ϫⲉ̣ [ⲙ̅ⲡⲉϥⲣ̅ⲥⲩⲙ]‐ <text:line-break/><text:span text:style-name="T1"> </text:span><text:span text:style-name="T2">(21/26) </text:span> ⲫⲱⲛⲓ ⲛⲙ̣̅ⲙⲁⲥ ⲛ̅ϭ̣ⲓ̣ ⲡ[ⲉⲥϣⲃⲏⲣ] <text:line-break/><text:span text:style-name="T1"> </text:span><text:span text:style-name="T2">(21/27) </text:span> [ⲛ̅ϩⲱⲧⲣ̅ ⲁⲥⲣ̅]ⲙⲉⲧⲁⲛⲟⲓ̈ ϩ[ⲛ̅] ⲟⲩ[ⲣⲓⲙⲉ] <text:line-break/><text:span text:style-name="T1"> </text:span><text:span text:style-name="T2">(22/1) </text:span> [ⲉ]ⲛⲁϣⲱϥ· ⲁⲩⲱ ⲁⲩ[ⲥ]ⲱⲧⲙ̣̅ ⲉⲡⲥⲟ‐ <text:line-break/><text:span text:style-name="T1"> </text:span><text:span text:style-name="T2">(22/2) </text:span> [ⲡ]ⲥ̣̅ ⲛ̣̅ⲧⲉⲥⲙⲉⲧⲁⲛ[ⲟⲓⲁ] ⲁⲩⲱ ⲁⲩ̣‐ <text:line-break/><text:span text:style-name="T1"> </text:span><text:span text:style-name="T2">(22/3) </text:span> [ⲉⲓⲛⲉ] ⲛ̣̅ⲟⲩⲥⲙⲟⲩ ⲉϩ̣ⲣ̣[ⲁⲓ̈] ϩ̣ⲁⲣⲟ[ⲥ ⲛ̅ϭⲓ] <text:line-break/><text:span text:style-name="T1"> </text:span><text:span text:style-name="T2">(22/4) </text:span> [ⲡⲉ]ⲡⲗⲏⲣⲱⲙⲁ ⲧ̣[ⲏⲣϥ̅ ⲙ̅]ⲡⲁϩ̣ⲟ[ⲣⲁⲧⲟⲛ] <text:line-break/><text:span text:style-name="T1"> </text:span><text:span text:style-name="T2">(22/5) </text:span> ⲙ̣̅ⲡⲁⲣⲑⲉⲛⲓⲕⲟⲛ̣ [ⲙ̅ⲡⲛ̅]̅ⲁ̅· ⲁⲩⲱ̣ [ⲁϥ]‐ <text:line-break/><text:span text:style-name="T1"> </text:span><text:span text:style-name="T2">(22/6) </text:span> ⲉⲓⲱⲣⲙ̅ ϩⲙ̅ ⲡⲧ[ⲣⲉϥⲉ]ⲓ̣ⲱⲣⲙ̅ ⲇⲉ [ⲛ̅ϭⲓ] <text:line-break/><text:span text:style-name="T1"> </text:span><text:span text:style-name="T2">(22/7) </text:span> ⲡ̣ⲁ̣[ϩ]ⲟ̣ⲣ̣[ⲁⲧⲟⲛ] ⲙ̣̅ⲡ̣̅̅[̅ⲛ̅]̅ⲁ̣̅̅ ⲁ̣ϥⲡⲱϩ̣[ⲧ̅’ ⲉ]‐ <text:line-break/><text:span text:style-name="T1"> </text:span><text:span text:style-name="T2">(22/8) </text:span> [ϩⲣⲁⲓ̈ ⲉϫⲱⲥ ⲛ̅]ϭ̣ⲓ [ⲡⲉⲡ̅ⲛ̅]ⲁ [ⲉ]ⲧ̣ⲟ̣[ⲩⲁⲁⲃ] <text:line-break/><text:soft-page-break/><text:span text:style-name="T1"> </text:span><text:span text:style-name="T2">(22/9) </text:span> [ⲉⲃⲟⲗ {ϩ̅ⲓ}ⲧⲛ̅ ⲡ]ⲉ̣→ⲩ←ⲡⲗⲏⲣⲱⲙⲁ̣ [ⲧⲏⲣϥ̅] <text:line-break/><text:span text:style-name="T1"> </text:span><text:span text:style-name="T2">(22/10) </text:span> [ⲛ̅ⲧⲁϥ{ⲉ̅ⲓ} ⲅⲁⲣ] ⲛⲁⲥ ⲁ[ⲛ] ⲛ̣̅ϭⲓ ⲡ[ⲉⲥϣⲃⲏⲣ] <text:line-break/><text:span text:style-name="T1"> </text:span><text:span text:style-name="T2">(22/11) </text:span> [ⲛ̅ϩⲱⲧⲣ̅ ⲁⲗ]ⲗⲁ ⲛ̅ⲧⲁϥ̣[{ⲉ̅ⲓ}] ⲛ̣ⲁ̣[ⲥ ⲉϩⲣⲁⲓ̈] <text:line-break/><text:span text:style-name="T1"> </text:span><text:span text:style-name="T2">(22/12) </text:span> [{ϩ̅ⲓ}ⲧⲛ̅ ⲡⲡⲗⲏⲣ]ⲱ̣ⲙⲁ· ϫⲉⲕⲁⲁⲥ ⲉϥ[ⲛⲁ]‐ <text:line-break/><text:span text:style-name="T1"> </text:span><text:span text:style-name="T2">(22/13) </text:span> [ⲥⲟϩⲉ ⲙ̅ⲡⲉⲥ]ϣⲧⲁ· ⲁⲩⲱ ⲁϥⲉⲓⲛ[ⲉ] <text:line-break/><text:span text:style-name="T1"> </text:span><text:span text:style-name="T2">(22/14) </text:span> [ⲙ̅ⲙⲟⲥ ⲉϩⲣ]ⲁ̣ⲓ̈ ⲉⲡⲉⲥⲁⲓⲱⲛ ⲁⲛ ⲙ̅[ⲙⲓⲛ] <text:line-break/><text:span text:style-name="T1"> </text:span><text:span text:style-name="T2">(22/15) </text:span> [ⲙ̅ⲙⲟⲥ ⲁⲗ]ⲗ̣ⲁ ⲛ̅ⲧⲡⲉ ⲙ̅ⲡⲉⲥϣⲏ̣[ⲣⲉ] <text:line-break/><text:span text:style-name="T1"> </text:span><text:span text:style-name="T2">(22/16) </text:span> [ⲉⲧⲉ ⲧⲁⲓ̈ ⲧⲉ ⲧ]ⲡⲉ ⲙ̅ⲙⲁϩⲯ̣ⲉⲓⲧ’ ϣ[ⲁⲛ]‐ <text:line-break/><text:span text:style-name="T1"> </text:span><text:span text:style-name="T2">(22/17) </text:span> [ⲧⲉⲥⲥⲟϩⲉ ⲙ̅ⲡ]ⲉ̣ⲥϣⲧⲁ· ⲁ̣ⲩⲱ ⲟⲩ‐ <text:line-break/><text:span text:style-name="T1"> </text:span><text:span text:style-name="T2">(22/18) </text:span> [ⲥⲙⲏ] ⲁ̣ⲥ̣{ⲉ̅ⲓ} ⲉⲃⲟⲗ ϩⲛ̅ ⲧⲡⲉ ⲛ̅ⲛⲁⲓⲱⲛ <text:line-break/><text:span text:style-name="T1"> </text:span><text:span text:style-name="T2">(22/19) </text:span> [ⲧⲁⲓ̈ ⲉ]ⲧ’ϫⲟⲥⲉ ϫⲉ ϥϣⲟⲟⲡ’ ⲛ̅ϭ[ⲓ ⲡ]ⲣ̣[ⲱ]‐ <text:line-break/><text:span text:style-name="T1"> </text:span><text:span text:style-name="T2">(22/20) </text:span> [ⲙⲉ ⲁⲩⲱ] ⲡ̣[ϣ]ⲏⲣⲉ ⲙ̅ⲡⲣⲱⲙⲉ· <text:line-break/><text:span text:style-name="T1"> </text:span><text:span text:style-name="T2">(22/21) </text:span> [ⲁϥ]ⲥ̣ⲱ[ⲧⲙ̅ ⲇ]ⲉ ⲛ̅ϭⲓ ⲡⲣⲱⲧⲁⲣⲭⲱⲛ <text:line-break/><text:span text:style-name="T1"> </text:span><text:span text:style-name="T2">(22/22) </text:span> [ⲓ̅̈̅ⲁ̅ⲗ̅]̅ⲧ̅ⲁ̅ⲃ̅ⲁ̅ⲱ̣̅̅[̅ⲑ̅] ⲉϥⲙⲉⲉⲩⲉ ϫⲉ ⲛ̅ⲧ[ⲁ]‐ <text:line-break/><text:span text:style-name="T1"> </text:span><text:span text:style-name="T2">(22/23) </text:span> [ⲧⲉⲥ]ⲙⲏ ϣ̣ⲱ̣ⲡⲉ ⲉⲃⲟⲗ {ϩ̅ⲓ}ⲧⲛ̅ ⲧⲉϥ̣ⲙ[ⲁ]‐ <text:line-break/><text:span text:style-name="T1"> </text:span><text:span text:style-name="T2">(22/24) </text:span> [ⲁⲩ· ⲁ]ⲩⲱ̣ ⲙ̅ⲡⲉϥⲉⲓⲙⲉ ϫⲉ ⲛ̅ⲧⲁ̣ⲥ̣[{ⲉ̅ⲓ}]‐ <text:line-break/><text:span text:style-name="T1"> </text:span><text:span text:style-name="T2">(22/25) </text:span> [ⲧⲱⲛ] ⲁ̣ⲩⲱ ⲁϥⲧⲥⲁⲃⲟⲟⲩ ⲛ̅ϭⲓ ⲡ[ⲙⲏ]‐ <text:line-break/><text:span text:style-name="T1"> </text:span><text:span text:style-name="T2">(22/26) </text:span> [ⲧⲣⲟⲡⲁ]ⲧⲱⲣ ⲉⲧⲟⲩⲁⲁⲃ· ⲁⲩ[ⲱ ⲡⲧⲉ]‐ <text:line-break/><text:span text:style-name="T1"> </text:span><text:span text:style-name="T2">(22/27) </text:span> [ⲗⲉⲓⲟⲥ ⲧⲉⲡⲣ]ⲟⲛⲟⲓⲁ ⲉⲧ’ϫⲏⲕ ⲉⲃⲟⲗ̣ <text:line-break/><text:span text:style-name="T1"> </text:span><text:span text:style-name="T2">(22/28) </text:span> [ⲧ{ϩ̅ⲓ}ⲕⲱⲛ] ⲙ̣̅ⲡ̣ⲓⲁϩⲟⲣⲁ[ⲧ]ⲟ̣ⲥ ⲉ̣ⲧⲉ̣ [ⲡⲁⲓ̈] <text:line-break/><text:span text:style-name="T1"> </text:span><text:span text:style-name="T2">(22/29) </text:span> [ⲡⲉ] ⲡ̣ⲓ̣[ⲱ]ⲧ’ ⲙ̅ⲡⲧⲏⲣ[ϥ̅ ⲡⲁⲓ̈ ⲉⲛⲧⲁ]‐ <text:line-break/><text:span text:style-name="T1"> </text:span><text:span text:style-name="T2">(22/30) </text:span> [ⲡⲧ]ⲏⲣϥ̅ ϣⲱⲡⲉ ⲛ̅ϩⲏ̣[ⲧϥ̅ ⲡϣⲟⲣⲡ̅’] <text:line-break/><text:span text:style-name="T1"> </text:span><text:span text:style-name="T2">(23/1) </text:span> ⲛ̅ⲣⲱⲙⲉ ϫⲉ ϩⲛ̅ ⲟⲩⲧⲩⲡⲟⲥ ⲛ̅ⲁⲛ[ⲇⲣⲉ]‐ <text:line-break/><text:span text:style-name="T1"> </text:span><text:span text:style-name="T2">(23/2) </text:span> ⲁⲥ ⲁϥⲟⲩⲱⲛ̣ϩ̅ ⲉⲃⲟⲗ ⲙ̅ⲡⲉ[ϥⲉⲓⲛⲉ] <text:line-break/><text:span text:style-name="T1"> </text:span><text:span text:style-name="T2">(23/3) </text:span> [ⲁ]ⲩ̣ⲱ̣ ⲁϥⲥⲧⲱⲧ’̣ ⲧⲏⲣϥ̅ ⲛ̅ϭⲓ ⲡⲉ[ⲱⲛ ⲙ̅]‐ <text:line-break/><text:span text:style-name="T1"> </text:span><text:span text:style-name="T2">(23/4) </text:span> [ⲡⲣ]ⲱ̣ⲧⲁⲣⲭⲱ̣[ⲛ ⲁ]ⲩⲱ ⲛ̅ⲥⲛ̅ⲧⲉ ⲙ̅ⲡ̣ⲛ̣ⲟ̣[ⲩⲛ] <text:line-break/><text:span text:style-name="T1"> </text:span><text:span text:style-name="T2">(23/5) </text:span> [ⲁⲩ]ⲕⲓⲙ· ⲁⲩⲱ̣ ⲉ̣[ⲃⲟ]ⲗ {ϩ̅ⲓ}ⲧⲛ̅ ⲙ̅ⲙⲟⲩⲉⲓ[ⲟ]‐ <text:line-break/><text:span text:style-name="T1"> </text:span><text:span text:style-name="T2">(23/6) </text:span> [ⲟⲩ]ⲉ̣ ⲛ[ⲁ]ⲓ̈ ⲉⲧ’[ϣⲟⲟ]ⲡ’ [{ϩ̅ⲓ}ϫⲛ̅ ⲑ]ⲩ[ⲗ]ⲏ̣ ⲁϥ[ⲣ̅]‐ <text:line-break/><text:span text:style-name="T1"> </text:span><text:span text:style-name="T2">(23/7) </text:span> [ⲟⲩⲟ]ⲉⲓⲛ ⲛ̅ϭⲓ̣ [ⲡ]ⲥ̣ⲁ [ⲙ̅ⲡⲓⲧⲛ̅ ⲉⲃⲟⲗ {ϩ̅ⲓ}ⲧⲛ̅] <text:line-break/><text:span text:style-name="T1"> </text:span><text:span text:style-name="T2">(23/8) </text:span> [ⲡⲟⲩ]ⲱⲛϩ̣̅ [ⲉ]ⲃ[ⲟⲗ] ⲛ̣̅ⲧⲉ̣[ϥ{ϩ̅ⲓ}ⲕⲱⲛ ⲧⲁⲓ̈ ⲛ̅]‐ <text:line-break/><text:span text:style-name="T1"> </text:span><text:span text:style-name="T2">(23/9) </text:span> [ⲧⲁⲥ]ⲟⲩⲟⲛϩⲥ̅· ⲁⲩⲱ ⲛ̣̅[ⲧⲉⲣⲟⲩⲉⲓⲱⲣⲙ̅] <text:line-break/><text:span text:style-name="T1"> </text:span><text:span text:style-name="T2">(23/10) </text:span> [ⲛ̅ϭⲓ ⲛ̅]ⲉⲝⲟⲩⲥ̣[ⲓ]ⲁ ⲧⲏⲣⲟ[ⲩ ⲁⲩⲱ ⲡⲣⲱⲧⲁⲣ]‐ <text:line-break/><text:span text:style-name="T1"> </text:span><text:span text:style-name="T2">(23/11) </text:span> [ⲭⲱⲛ] ⲁⲩ̣ⲛ̣ⲁⲩ ⲉⲡⲙⲉ̣[ⲣⲟⲥ ⲧⲏⲣϥ̅ ⲙ̅ⲡⲥⲁ] <text:line-break/><text:span text:style-name="T1"> </text:span><text:span text:style-name="T2">(23/12) </text:span> [ⲙ̅ⲡⲓⲧ]ⲛ̅ ⲉⲁϥⲣ̅ⲟⲩⲟⲉ[ⲓⲛ ⲁⲩⲱ ⲉⲃⲟⲗ] <text:line-break/><text:span text:style-name="T1"> </text:span><text:span text:style-name="T2">(23/13) </text:span> [{ϩ̅ⲓ}ⲧ]ⲛ̣̅ ⲡⲟⲩⲟⲉⲓⲛ ⲁⲩⲛ[ⲁⲩ ⲛ̅ϩⲣⲁⲓ̈ ϩⲙ̅] <text:line-break/><text:span text:style-name="T1"> </text:span><text:span text:style-name="T2">(23/14) </text:span> [ⲡ]ⲙⲟⲟⲩ ⲁⲡ’ⲧⲩⲡⲟⲥ ⲛ̅[ⲑⲓⲕⲱⲛ ⲁⲩⲱ] <text:line-break/><text:span text:style-name="T1"> </text:span><text:span text:style-name="T2">(23/15) </text:span> [ⲡ]ⲉϫⲁϥ ⲛ̅ⲛ̅ⲉⲝⲟⲩⲥⲓ[ⲁ ⲉⲧ’ϣⲟⲟⲡ’] <text:line-break/><text:span text:style-name="T1"> </text:span><text:span text:style-name="T2">(23/16) </text:span> [ϣ]ⲁ̣ⲣⲟϥ ϫⲉ ⲁⲙⲏⲉⲓⲧ[ⲛ̅ ⲛ̅ⲧⲛ̅ⲧⲁⲙⲓⲟ] <text:line-break/><text:span text:style-name="T1"> </text:span><text:span text:style-name="T2">(23/17) </text:span> [ⲛ̅ⲟ]ⲩⲣⲱⲙⲉ ⲕⲁⲧⲁ ⲑ̣[ⲓ]ⲕ̣[ⲱⲛ ⲙ̅ⲡⲛⲟⲩ]‐ <text:line-break/><text:span text:style-name="T1"> </text:span><text:span text:style-name="T2">(23/18) </text:span> [ⲧⲉ ⲁⲩ]ⲱ ⲕⲁⲧⲁ ⲡⲉⲛⲉⲓⲛⲉ ϫ[ⲉⲕⲁ]‐ <text:line-break/><text:span text:style-name="T1"> </text:span><text:span text:style-name="T2">(23/19) </text:span> [ⲁ]ⲥ ⲉⲣⲉⲧⲉϥ{ϩ̅ⲓ}ⲕⲱⲛ ⲛⲁϣⲱ[ⲡⲉ ⲛⲁⲛ] <text:line-break/><text:span text:style-name="T1"> </text:span><text:span text:style-name="T2">(23/20) </text:span> [ⲛ̅ⲟⲩ]ⲟⲉⲓⲛ· ⲁⲩⲱ ⲁⲩⲧ̣ⲁⲙ̣[ⲓⲟ ⲉⲃⲟⲗ] <text:line-break/><text:span text:style-name="T1"> </text:span><text:span text:style-name="T2">(23/21) </text:span> [{ϩ̅ⲓ}ⲧⲛ̅] ⲛ̅ϭⲟⲙ ⲛ̅ⲛⲉⲩⲉ[ⲣⲏ]ⲟ̣[ⲩ] ⲕⲁ[ⲧⲁ ⲙ̅]‐ <text:line-break/><text:span text:style-name="T1"> </text:span><text:span text:style-name="T2">(23/22) </text:span> [ⲙⲁⲉⲓ]ⲛ ⲉⲛⲧⲁϥϯ ⲙ̅ⲙ[ⲟⲥ] ⲛ̣ⲁⲩ· ⲁ[ⲩⲱ] <text:line-break/><text:span text:style-name="T1"> </text:span><text:span text:style-name="T2">(23/23) </text:span> [ⲧⲟ]ⲩ̣{ⲉ̅ⲓ} ⲧⲟⲩ{ⲉⲓ} ⲛ̅ⲛ̅ⲉⲝ[ⲟ]ⲩⲥⲓⲁ̣ [ⲁⲩϯ ⲛ̅]‐ <text:line-break/><text:span text:style-name="T1"> </text:span><text:span text:style-name="T2">(23/24) </text:span> [ⲟⲩ]ⲙⲁⲉⲓⲛ ⲛ̅ϩⲣⲁⲓ̈ ϩⲙ̅ ⲡⲧⲩ[ⲡⲟⲥ ⲛ̅]‐ <text:line-break/><text:span text:style-name="T1"> </text:span><text:span text:style-name="T2">(23/25) </text:span> [ⲑⲓ]ⲕⲱⲛ ⲧⲁⲓ̈ ⲛ̅ⲧⲁⲩⲛⲁⲩ ⲉ[ⲣⲟⲥ ⲛ̅]‐ <text:line-break/><text:soft-page-break/><text:span text:style-name="T1"> </text:span><text:span text:style-name="T2">(23/26) </text:span> [ϩⲣⲁ]ⲓ̈ ϩⲛ̅ ⲧⲉⲯⲩⲭⲓⲕⲏ ⲁ̣[ϥⲧⲁⲙⲓⲟ ⲛ̅]‐ <text:line-break/><text:span text:style-name="T1"> </text:span><text:span text:style-name="T2">(23/27) </text:span> ⲟ̣ⲩϩⲩ̣ⲡⲟⲥⲧⲁⲥⲓⲥ [ⲕⲁⲧⲁ ⲡⲓⲛⲉ ⲙ̅]‐ <text:line-break/><text:span text:style-name="T1"> </text:span><text:span text:style-name="T2">(23/28) </text:span> ⲡ̣ϣ̣ⲟⲣ̣ⲡ̅’ [ⲛ̅ⲣ]ⲱⲙⲉ ⲛ̣̅ⲧⲉ̣[ⲗⲉⲓⲟⲥ] <text:line-break/><text:span text:style-name="T1"> </text:span><text:span text:style-name="T2">(23/29) </text:span> [ⲁⲩⲱ] ⲡ̣ⲉ̣[ϫ]ⲁ̣ⲩ ϫⲉ ⲙⲁⲣⲛ̅ⲙⲟⲩ[ⲧⲉ] <text:line-break/><text:span text:style-name="T1"> </text:span><text:span text:style-name="T2">(23/30) </text:span> [ⲉⲣⲟϥ ϫⲉ ⲁⲇ]ⲁ̣ⲙ ϫⲉⲕⲁ̣[ⲁ]ⲥ̣ ⲉⲣ[ⲉ]‐ <text:line-break/><text:span text:style-name="T1"> </text:span><text:span text:style-name="T2">(24/1) </text:span> [ⲡⲉ]ϥⲣⲁⲛ ⲛⲁϣⲱⲡⲉ ⲛⲁⲛ ⲛ̅ⲟⲩϭⲟⲙ <text:line-break/><text:span text:style-name="T1"> </text:span><text:span text:style-name="T2">(24/2) </text:span> [ⲛ̅]ⲟⲩ̣ⲟⲉⲓⲛ· ⲁⲩⲱ ⲁⲩⲣ̣̅ⲁⲣ〈ⲭ〉ⲓ ⲛ̅ϭⲓ ⲛ̅‐ <text:line-break/><text:span text:style-name="T1"> </text:span><text:span text:style-name="T2">(24/3) </text:span> [ⲇⲩⲛⲁ]ⲙⲓⲥ· ⲧϣⲟⲣⲡ̅’ ⲧⲉ ⲧ̅ⲙ̅ⲛ̅ⲧ̅’̅ⲭ̣̅[ⲣⲥ̅] <text:line-break/><text:span text:style-name="T1"> </text:span><text:span text:style-name="T2">(24/4) </text:span> [ⲁⲥⲧ]ⲁ̣ⲙⲓⲟ ⲛ̅ⲟⲩⲯⲩ̣[ⲭⲏ] ⲛ̅ⲕⲁⲥ· ⲧ̣[ⲙⲉϩ]‐ <text:line-break/><text:span text:style-name="T1"> </text:span><text:span text:style-name="T2">(24/5) </text:span> ⲥⲛ̣̅ⲧⲉ ⲧⲉ ⲧ’ⲡⲣⲟⲛⲟ̣[ⲓ]ⲁ̣ ⲁⲥ[ⲧ]ⲁⲙⲓⲟ [ⲛ̅ⲟⲩ]‐ <text:line-break/><text:span text:style-name="T1"> </text:span><text:span text:style-name="T2">(24/6) </text:span> ⲯⲩⲭⲏ ⲙ̅ⲙⲟⲩⲧ’ [ⲧ]ⲙⲉϩϣⲟⲙⲧⲉ̣ [ⲇⲉ] <text:line-break/><text:span text:style-name="T1"> </text:span><text:span text:style-name="T2">(24/7) </text:span> ⲧⲉ ⲧ̅ⲙ̅ⲛ̅[ⲧⲛⲟ]ⲩ̣ⲧ[ⲉ ⲁⲥ]ⲧ̣ⲁⲙⲓⲟ ⲛ̅ⲟⲩ[ⲯⲩ]‐ <text:line-break/><text:span text:style-name="T1"> </text:span><text:span text:style-name="T2">(24/8) </text:span> [ⲭⲏ ⲛ̅ⲥⲁⲣⲝ ⲧⲙ]ⲉϩϥ̣[ⲧ]ⲟ̣ ⲇⲉ̣ ⲧⲉ ⲧ[ⲙ̅ⲛ̅ⲧ̅’̅]‐ <text:line-break/><text:span text:style-name="T1"> </text:span><text:span text:style-name="T2">(24/9) </text:span> [ϫⲟⲉⲓⲥ ⲁⲥⲧⲁⲙⲓ]ⲟ ⲛ̣̅ⲟ̣ⲩ̣ⲯⲩⲭⲏ ⲛ̣̅[ⲁⲧ’ⲕⲁⲥ]‐ <text:line-break/><text:span text:style-name="T1"> </text:span><text:span text:style-name="T2">(24/10) </text:span> [ⲧⲙⲉϩϯ ⲧⲉ] ⲧ̣ⲙ̅ⲛ̅ⲧⲉⲣⲟ ⲁⲥⲧⲁⲙ̣[ⲓⲟ] <text:line-break/><text:span text:style-name="T1"> </text:span><text:span text:style-name="T2">(24/11) </text:span> [ⲛ̅ⲟⲩⲯⲩⲭⲏ ⲛ̅]ⲥⲛⲟϥ· ⲧⲙⲉϩⲥ̣[ⲟ ⲡⲉ] <text:line-break/><text:span text:style-name="T1"> </text:span><text:span text:style-name="T2">(24/12) </text:span> [ⲡⲕⲱϩ ⲁⲥⲧⲁⲙ]ⲓ̣ⲟ ⲛ̅ⲟⲩⲯⲩⲭⲏ̣ [ⲛ̅ϣⲁ]‐ <text:line-break/><text:span text:style-name="T1"> </text:span><text:span text:style-name="T2">(24/13) </text:span> [ⲁⲣ ⲧⲙⲉϩⲥⲁ]ϣϥⲉ ⲧⲉ ⲧ̅ⲙ̅ⲛ̅ⲧⲣ[ⲙ̅ⲛ̅]‐ <text:line-break/><text:span text:style-name="T1"> </text:span><text:span text:style-name="T2">(24/14) </text:span> [ϩⲏⲧ’ ⲁⲥⲧⲁⲙⲓⲟ] ⲛ̣̅ⲟⲩⲯⲩⲭⲏ ⲛ̅ⲃⲟ[ⲩϩⲉ] <text:line-break/><text:span text:style-name="T1"> </text:span><text:span text:style-name="T2">(24/15) </text:span> [ⲁⲩⲁϩⲉ ⲇⲉ ⲧ]ⲏ̣ⲣⲟⲩ ⲉⲣⲟϥ ⲛ̅ϭⲓ ⲡⲁϣ̣[ⲁⲓ̈] <text:line-break/><text:span text:style-name="T1"> </text:span><text:span text:style-name="T2">(24/16) </text:span> [ⲛ̅ⲛ̅ⲁⲅⲅⲉⲗⲟ]ⲥ̣ ⲁⲩϫⲓ ⲉⲃⲟⲗ {ϩ̅ⲓ}ⲧⲛ̅ ⲛ̣̅‐ <text:line-break/><text:span text:style-name="T1"> </text:span><text:span text:style-name="T2">(24/17) </text:span> [ⲉⲝⲟⲩⲥⲓⲁ ⲛ̅]ⲧⲥⲁϣϥⲉ ⲛ̅ϩⲩⲡⲟⲥ̣[ⲧⲁ]‐ <text:line-break/><text:span text:style-name="T1"> </text:span><text:span text:style-name="T2">(24/18) </text:span> [ⲥⲓⲥ ⲛ̅ⲧⲉ ⲧⲯ]ⲩ̣ⲭⲏ ϫⲉⲕⲁⲁⲥ ⲉⲩⲛ[ⲁⲧⲁ]‐ <text:line-break/><text:span text:style-name="T1"> </text:span><text:span text:style-name="T2">(24/19) </text:span> [ⲙⲓⲟ] ⲙ̣̅ⲡ̣ϫ̣ⲱ̣[ⲛϥ̅] ⲛ̅ⲙ̅ⲙⲉⲗⲟⲥ ⲙ[ⲛ̅ ⲡϫⲱ]‐ <text:line-break/><text:span text:style-name="T1"> </text:span><text:span text:style-name="T2">(24/20) </text:span> [ⲛϥ̅] ⲛ̣̅ⲛ̅ϣⲁⲩ ⲙⲛ̣̅ ⲧⲥⲩⲛⲑⲉⲥⲓⲥ ⲙ̣̅ⲡ̣[ⲧⲉ]‐ <text:line-break/><text:span text:style-name="T1"> </text:span><text:span text:style-name="T2">(24/21) </text:span> [ⲛⲟ] ⲙ̅ⲡⲟⲩⲁ ⲡⲟⲩⲁ ⲛ̅ⲛⲙ̅ⲙⲉⲗⲟⲥ· <text:line-break/><text:span text:style-name="T1"> </text:span><text:span text:style-name="T2">(24/22) </text:span> [ⲡ]ϣ[ⲟⲣ]ⲡ̅’̣ ⲙⲉⲛ ⲁϥⲣ̅ⲁⲣ〈ⲭ〉ⲉⲓ ⲉⲧⲁⲙ[ⲓⲟ ⲛ̅]‐ <text:line-break/><text:span text:style-name="T1"> </text:span><text:span text:style-name="T2">(24/23) </text:span> [ⲧⲁ]ⲡⲉ̣ ⲉ̣̅̅[̅ⲧ̅ⲉ̅ⲣ̅]̅ⲁ̅ⲫ̅ⲁ̅ⲱ̅ⲡ̅ⲉ̅· ⲁ̅ⲃⲣⲱ̣[ⲛ̅] <text:line-break/><text:span text:style-name="T1"> </text:span><text:span text:style-name="T2">(24/24) </text:span> [ⲁϥ]ⲧⲁⲙⲓⲟ̣ [ⲛ̅]ϫⲱϥ ⲙ̅ⲏ̅ⲛ̅ⲓ̅ⲅ̅ⲅ̅ⲉ̅ⲥ̅ⲥ̣̅̅[̅ⲧ̅ⲣ̅ⲱ̅ⲏ̅ⲑ̅] <text:line-break/><text:span text:style-name="T1"> </text:span><text:span text:style-name="T2">(24/25) </text:span> [ⲁϥ]ⲧⲁⲙⲓⲟ̣ [ⲙ̅]ⲡⲉⲛⲕⲉⲫⲁⲗⲟⲥ· <text:line-break/><text:span text:style-name="T1"> </text:span><text:span text:style-name="T2">(24/26) </text:span> [ⲁ̅ⲥ̅]̅ⲧ̣̅̅ⲉ̅ⲣ̣̅̅ⲉ̣̅̅[̅ⲭ̅]̅ⲙ̅ⲏ̅ ⲙ̅ⲡⲃⲁⲗ ⲛ̅ⲟⲩⲛⲁⲙ̣ <text:line-break/><text:span text:style-name="T1"> </text:span><text:span text:style-name="T2">(24/27) </text:span> [ⲑ̅ⲁ̅ⲥ̅]̅ⲡ̣̅̅ⲟ̅ⲙ̅ⲟ̅ⲭ̅ⲁ̅ ⲙ̅ⲡⲃⲁⲗ ⲛ̅ϭⲃⲟⲩ[ⲣ] <text:line-break/><text:span text:style-name="T1"> </text:span><text:span text:style-name="T2">(24/28) </text:span> [ⲓ̈ⲉⲣⲱ]ⲛⲩⲙⲟ̣ⲥ̣ ⲙ̅ⲡⲙⲁⲁϫⲉ ⲛ̅ⲟⲩ[ⲛⲁⲙ] <text:line-break/><text:span text:style-name="T1"> </text:span><text:span text:style-name="T2">(24/29) </text:span> [ⲃ̅ⲓ̅ⲥ̅ⲥ̅ⲟ̅ⲩ̅ⲙ̅ ⲙ̅]ⲡⲙⲁⲁϫⲉ ⲛ̅ϭⲃⲟ̣ⲩ̣ⲣ <text:line-break/><text:span text:style-name="T1"> </text:span><text:span text:style-name="T2">(24/30) </text:span> [ⲁ̅ⲕ̅ⲉ̅ⲓ̅ⲱ̅]̅ⲣ̣̅̅ⲓ̣̅̅[̅ⲙ̅] ⲙ̅ⲡϣⲁ· ⲃ̅ⲁⲛ[ⲏ]ⲛ̅ ⲉ̅ⲫ[ⲣⲟⲩⲙ̅] <text:line-break/><text:span text:style-name="T1"> </text:span><text:span text:style-name="T2">(24/31) </text:span> [ⲛ̅ⲛⲉⲥ]ⲡ̣ⲟⲧⲟⲩ· ⲁ̅ⲙ̅[̅ⲏ̅]̅ⲛ̅ ⲛ̅[ⲛ̅ⲟⲃϩⲉ] <text:line-break/><text:span text:style-name="T1"> </text:span><text:span text:style-name="T2">(24/32) </text:span> [ⲓⲃⲓ]ⲕⲁⲛ ⲛ̅ⲛⲁϫϩⲉ· ⲃ̣̅̅[̅ⲁ̅ⲥ̅ⲓ̅ⲗ̅ⲓ̅ⲁ̅ⲇ̅ⲏ̅ⲙ̅ⲏ̅] <text:line-break/><text:span text:style-name="T1"> </text:span><text:span text:style-name="T2">(25/1) </text:span> ⲙ̅ⲡⲁⲣⲓⲥⲑⲙⲓⲟⲛ· ⲁⲭⲭⲁ ⲛ̅ⲥⲧⲁⲫ̣[ⲩⲗⲏ] <text:line-break/><text:span text:style-name="T1"> </text:span><text:span text:style-name="T2">(25/2) </text:span> ⲁ̅ⲇ̅ⲁ̅ⲃ̅ⲁ̅ⲛ̅ ⲙ̅ⲡⲙⲟⲩⲧ’· ⲭ̅ⲁⲁⲙ̣[ⲁⲛ̅ ⲙ̅]‐ <text:line-break/><text:span text:style-name="T1"> </text:span><text:span text:style-name="T2">(25/3) </text:span> [ⲡ]ⲥ̣ⲫⲟⲛⲧⲩⲗⲟⲥ̣ ⲇ̅ⲉ̅ⲁ̅ⲣ̅ⲭ̅ⲱ̅ ⲛ̅ⲧϣ̣[ⲟⲩⲱⲃⲉ] <text:line-break/><text:span text:style-name="T1"> </text:span><text:span text:style-name="T2">(25/4) </text:span> [ⲧ̅ⲏ̅]̅ⲃ̅ⲁ̅ⲣ̅ ⲛ̅ⲧⲛ̣[ⲁϩⲃ]ⲉ ⲛ̅ⲟⲩⲛⲁⲙ· ⲛ̣[.....] <text:line-break/><text:span text:style-name="T1"> </text:span><text:span text:style-name="T2">(25/5) </text:span> [ⲛ̅ⲧ]ⲛⲁϩⲃⲉ ⲛ̅ϭⲃⲟ̣ⲩ̣ⲣ̣· ⲙ̅ⲛ̅ⲓ̅ⲁ̅ⲭ̅ⲱ̅ⲣ̅ [ⲙ̅ⲡⲕⲉ]‐ <text:line-break/><text:span text:style-name="T1"> </text:span><text:span text:style-name="T2">(25/6) </text:span> [ⲗⲉⲛ]ⲕⲉϩ ⲛ̅ⲟⲩⲛ[ⲁⲙ] ...ⲉ ⲙ̅[ⲡⲕⲉ]‐ <text:line-break/><text:span text:style-name="T1"> </text:span><text:span text:style-name="T2">(25/7) </text:span> [ⲗⲉ]ⲛ̣ⲕⲉϩ ⲛ̅ϩⲃⲟ̣[ⲩ]ⲣ· ⲁ̣[ⲃⲓⲧⲣⲓⲱⲛ ⲛ̅ⲑⲱⲙⲉ] <text:line-break/><text:span text:style-name="T1"> </text:span><text:span text:style-name="T2">(25/8) </text:span> [ⲛ̅ⲟⲩ]ⲛⲁⲙ· ⲉ̅ⲩ̅ⲁ̅ⲛ̅ⲑ̣̅̅[̅ⲏ̅ⲛ̅ ⲛ̅ⲑⲱⲙⲉ ⲛ̅ϭⲃⲟⲩⲣ] <text:line-break/><text:span text:style-name="T1"> </text:span><text:span text:style-name="T2">(25/9) </text:span> [ⲕ̅ⲣ̅]̅ⲩ̣̅̅ⲥ̅ ⲛ̅ⲧϭⲓϫ ⲛ̅ⲟⲩⲛ[ⲁⲙ] ⲃ̣[ⲏⲗⲩⲁⲓ ⲛ̅]‐ <text:line-break/><text:span text:style-name="T1"> </text:span><text:span text:style-name="T2">(25/10) </text:span> [ⲧϭⲓ]ϫ ⲛ̅ϭⲃⲟⲩⲣ· ⲧ̅ⲣ̅ⲏ̣̅̅[̅ⲛ̅ⲉ̅]̅ⲩ̅ ⲛ̅ⲧ̣ⲏ[ⲃⲉ 〈ⲛ̅ⲧϭⲓϫ〉 ⲛ̅]‐ <text:line-break/><text:soft-page-break/><text:span text:style-name="T1"> </text:span><text:span text:style-name="T2">(25/11) </text:span> [ⲟⲩ]ⲛ̣ⲁⲙ· ⲃ̅ⲁ̅ⲗ̅ⲃ̅ⲏ̅ⲗ̅ ⲛ̣̅[ⲧⲏ]ⲃⲉ ⲛ̣̅[ⲧ]ϭ̣[ⲓϫ ⲛ̅]‐ <text:line-break/><text:span text:style-name="T1"> </text:span><text:span text:style-name="T2">(25/12) </text:span> [ϭⲃⲟ]ⲩⲣ· ⲕⲣⲓⲙⲁⲛ ⲛ̅ⲉ̣[ⲓⲉⲓⲃ ⲛ̅]ⲛ̣̅[ϭⲓϫ·] <text:line-break/><text:span text:style-name="T1"> </text:span><text:span text:style-name="T2">(25/13) </text:span> [ⲁ̅ⲥ̅]̅ⲧ̣̅̅ⲣ̅ⲱ̅ⲯ̅ ⲧⲕⲓⲃⲉ ⲛ̅ⲟ[ⲩⲛⲁⲙ· ⲃ̅ⲁⲣⲣⲱⲫ̅] <text:line-break/><text:span text:style-name="T1"> </text:span><text:span text:style-name="T2">(25/14) </text:span> [ⲧⲕ]ⲓ̣ⲃⲉ ⲛ̅ϭⲃⲟⲩⲣ· ⲃ̅ⲁ̅ⲟ̅[̅ⲩ̅ⲙ̅ ⲡϫⲟ ⲛ̅]‐ <text:line-break/><text:span text:style-name="T1"> </text:span><text:span text:style-name="T2">(25/15) </text:span> [ⲟ]ⲩ̣ⲛⲁⲙ· ⲁ̅ⲣ̅ⲁ̅ⲣ̅ⲓ̅ⲙ̅ ⲡϫ[ⲟ ⲛ̅ϭⲃⲟⲩⲣ·] <text:line-break/><text:span text:style-name="T1"> </text:span><text:span text:style-name="T2">(25/16) </text:span> [ⲁ̅ⲣ̅]̅ⲉ̅ⲭ̅ⲏ̅ ⲛ̅ⲧⲕⲟⲓⲗⲓⲁ· ⲫ̅[ⲑⲁⲩⲏ̅ ⲛ̅ⲑⲟⲗⲡⲉ·] <text:line-break/><text:span text:style-name="T1"> </text:span><text:span text:style-name="T2">(25/17) </text:span> [ⲥ̅ⲏ̅]̅ⲛ̅ⲁ̅ⲫ̅ⲑ̅ⲓ̅ ⲩ̈ⲡⲟⲭⲟ̣[ⲛ]ⲇ̣ⲣ̣ⲓⲟⲥ̣ ⲁ̣̅ⲣ̣[ⲁⲭⲉ̅]‐ <text:line-break/><text:span text:style-name="T1"> </text:span><text:span text:style-name="T2">(25/18) </text:span> [ⲑ̅ⲱ̅ⲡ̅]ⲓ̣ ⲙ̅ⲡⲥⲡⲓⲣ ⲛ̅ⲟⲩ̣ⲛⲁⲙ· ⲁ̅ⲃⲉ̣[ⲇⲱ̅] <text:line-break/><text:span text:style-name="T1"> </text:span><text:span text:style-name="T2">(25/19) </text:span> [ⲙ̅]ⲡⲥⲡⲓⲣ ⲛ̅ϭⲃⲟⲩⲣ· ⲃⲁⲣⲓⲁⲥ ⲛ̅ⲧ̅’̣̅̅[ϯⲡⲉ] <text:line-break/><text:span text:style-name="T1"> </text:span><text:span text:style-name="T2">(25/20) </text:span> ⲛ̣̅ⲟⲩⲛⲁⲙ· ⲫⲛⲟⲩⲑ ⲧϯ[ⲡⲉ] ⲛ̣̅ϭ̣[ⲣⲟⲩⲣ] <text:line-break/><text:span text:style-name="T1"> </text:span><text:span text:style-name="T2">(25/21) </text:span> [ⲁ̅ⲃ̅ⲏ̅ⲛ̅]̅ⲗ̅ⲉ̅ⲛ̅ⲁ̅ⲣ̅ⲭ̅ⲉ̅ⲓ ⲛ̅ⲛⲁ[ⲧ]ⲕ̣[ⲁ]ⲥ̣· ⲭ̣̅[ⲛⲟⲩ̅] <text:line-break/><text:span text:style-name="T1"> </text:span><text:span text:style-name="T2">(25/22) </text:span> [ⲙ̅ⲉ̅ⲛ̅ⲓ̅ⲛ̅]̅ⲟ̅ⲣ̅ⲓ̅ⲛ̅ ⲛ̅ⲛ̅ⲕⲁⲁ[ⲥ]· ⲥⲏⲥⲟ[ⲗⲉ ⲙ̅ⲡ]‐ <text:line-break/><text:span text:style-name="T1"> </text:span><text:span text:style-name="T2">(25/23) </text:span> [ⲥⲧⲟⲙⲁ]ⲭ̣ⲟⲥ· ⲁⲅ̅ⲣ̅ⲟ̅ⲙ̣̅̅ⲁ̣̅̅ⲩ̅ⲙ̅ⲁ̅ ⲙ̣̅[ⲫⲏⲧ’] <text:line-break/><text:span text:style-name="T1"> </text:span><text:span text:style-name="T2">(25/24) </text:span> [ⲃ̅ⲁ̅ⲛ̅ⲱ̅] ⲙ̣̅ⲡⲛⲉⲩⲙⲟⲛⲓⲛ̣ ⲥ̣̅[ⲱⲥⲧⲣⲁⲡⲁⲗ̅] <text:line-break/><text:span text:style-name="T1"> </text:span><text:span text:style-name="T2">(25/25) </text:span> [ⲙ̅ⲡϩⲏ]ⲡ̣ⲁⲣ· ⲁ̅ⲛ̅ⲏ̅ⲥ̣̅̅[̅ⲓ̅]̅ⲙ̅ⲁ̅ⲗ̅ⲁ̅ⲣ̅ [ⲙ̅ⲡⲥⲡⲗⲏⲛ] <text:line-break/><text:span text:style-name="T1"> </text:span><text:span text:style-name="T2">(25/26) </text:span> [ⲑⲱ]ⲡⲓⲑⲣⲱ ⲛ̅ⲛ̅ⲙ[ⲉ]ϩⲧ̅’· ⲃ̣̅̅ⲓ̣̅̅[̅ⲃ̅ⲗ̅ⲱ̅ ⲛ̅]‐ <text:line-break/><text:span text:style-name="T1"> </text:span><text:span text:style-name="T2">(25/27) </text:span> [ⲛ̅ϭⲗⲁ]ⲧ̣ⲉ· ⲣⲟⲉⲣⲱⲣ [ⲛ̅ⲙ̅ⲙⲟⲩⲧ’] <text:line-break/><text:span text:style-name="T1"> </text:span><text:span text:style-name="T2">(25/28) </text:span> [ⲧ̅ⲁ̅ⲫ̅ⲣ̅]̅ⲉ̅ⲱ̅ ⲛ̅ⲛ̅ϫⲓⲥⲉ [ⲙ̅]ⲡ̣[ⲥⲱⲙⲁ] <text:line-break/><text:span text:style-name="T1"> </text:span><text:span text:style-name="T2">(25/29) </text:span> [ⲓ̅̈̅ⲡ̅ⲟ̅ⲩ̅]̅ⲥ̣̅̅ⲡ̅ⲟ̅[̅ⲃ̅]̅ⲱ̅ⲃ̅ⲁ̅ ⲛ̅ⲛ̅ⲫ[ⲗⲉⲯ] <text:line-break/><text:span text:style-name="T1"> </text:span><text:span text:style-name="T2">(25/30) </text:span> [ⲃ̅ⲓ̅ⲛ̅ⲉ̅ⲃ̅ⲟ̅ⲣ̅ⲓ̅ⲛ̅] ⲛ̅ⲁⲣⲧⲏⲣⲓ̣[ⲁ·] <text:line-break/><text:span text:style-name="T1"> </text:span><text:span text:style-name="T2">(26/1) </text:span> [ⲁ̅ⲁ̅]̅ⲧ̣̅̅ⲟ̣̅̅ⲓ̣̅̅ⲙ̅ⲉⲛⲫⲏⲫⲉⲓ̅ ⲛⲱⲟⲩ ⲛⲉ ⲛ̅ⲛⲓ‐ <text:line-break/><text:span text:style-name="T1"> </text:span><text:span text:style-name="T2">(26/2) </text:span> [ϥⲉ ⲉ]ⲧ’ϩⲛ̅ ⲙ̅ⲙⲉⲗⲟⲥ ⲧⲏⲣⲟⲩ ⲏ̅ⲛ̅ⲑ̅ⲟ̣̅̅[̅ⲗ̅ⲗ̅ⲉ̅]‐ <text:line-break/><text:span text:style-name="T1"> </text:span><text:span text:style-name="T2">(26/3) </text:span> [ⲓ̅ⲁ̅] ⲧ̣ⲥⲁⲣⲝ̅ ⲧⲏⲣⲥ̅· ⲃ̣̅ⲉⲇⲟⲩⲕ̅ ⲡⲧ[ⲉⲧⲉ] <text:line-break/><text:span text:style-name="T1"> </text:span><text:span text:style-name="T2">(26/4) </text:span> [ⲛ̅ⲟ]ⲩⲛⲁⲙ· ⲁⲣⲁⲃ̣[ⲏⲉⲓ] ⲡⲃⲁϩ ⲛ̅ϭⲃ̣[ⲟⲩⲣ] <text:line-break/><text:span text:style-name="T1"> </text:span><text:span text:style-name="T2">(26/5) </text:span> [ⲉⲓ]ⲗ̣ⲱ ⲛ̅ⲇⲓⲇⲩⲙⲟ[ⲥ]· ⲥⲟ→ⲣ̅]̅1̅2̅ⲙ̅ⲁ̅ ⲛ̅ⲉⲇ[ⲩⲟⲛ] <text:line-break/><text:span text:style-name="T1"> </text:span><text:span text:style-name="T2">(26/6) </text:span> [ⲅ̅ⲟ̅ⲣ̅]̅ⲙ̅ⲁⲕ̣ⲁⲓ̅ⲟ̅ⲭⲗ[ⲁⲃⲁ]ⲣ̣̅ ⲡⲙⲏⲣⲟⲥ ⲛ̣̅[ⲟⲩ]‐ <text:line-break/><text:span text:style-name="T1"> </text:span><text:span text:style-name="T2">(26/7) </text:span> [ⲛⲁ]ⲙ· [ⲛ̅ⲉ̅ⲃ̅ⲣ̅ⲓ̅ⲑ̅] ⲡ̣ⲙⲏⲣⲟⲥ ⲛ̅ϭⲃⲟ̣[ⲩⲣ] <text:line-break/><text:span text:style-name="T1"> </text:span><text:span text:style-name="T2">(26/8) </text:span> [ⲯ̅ⲏ̅ⲣ̅ⲏ̅ⲙ̅ ⲛ̅ϭⲗⲁ]ⲧ̣ⲉ ⲛ̅ⲧ̣[ⲟ]ⲩⲣⲏⲧⲉ ⲛ̣̅[ⲟⲩⲛⲁⲙ] <text:line-break/><text:span text:style-name="T1"> </text:span><text:span text:style-name="T2">(26/9) </text:span> [ⲁ̅ⲥ̅ⲁ̅ⲕ̅ⲗ̅ⲁ̅ⲥ̅ ⲧϭⲗ]ⲱ̣ⲧ’ ⲛ̅ϭⲃⲟⲩⲣ ⲓ̅̈ⲟⲣ̣[ⲙⲁⲱⲑ̅] <text:line-break/><text:span text:style-name="T1"> </text:span><text:span text:style-name="T2">(26/10) </text:span> [ⲡⲡ]ⲉⲧ’ ⲛ̣̅[ⲟⲩ]ⲛⲁⲙ· ⲏ̅ⲙ̅ⲏ̅ⲛ̅ⲩ̅ⲛ̅ [ⲡⲡⲉⲧ’]‐ <text:line-break/><text:span text:style-name="T1"> </text:span><text:span text:style-name="T2">(26/11) </text:span> [ⲛ̅]ϭⲃ[ⲟ]ⲩⲣ [ⲕ̅ⲛ̅]̅ⲩ̣̅̅ⲝ̣ ⲧⲥⲏϥⲉ ⲛ̅ⲟⲩ[ⲛⲁⲙ·] <text:line-break/><text:span text:style-name="T1"> </text:span><text:span text:style-name="T2">(26/12) </text:span> ⲧ̣ⲩ̣ⲡ̣ⲏ̣ⲗⲟⲛ [ⲧ]ⲥ̣ⲏ̣ϥⲉ ⲛ̅ϭⲃⲟⲩⲣ ⲁ̣̅̅[̅ⲭ̅ⲓ̅ⲏ̅ⲗ̅] <text:line-break/><text:span text:style-name="T1"> </text:span><text:span text:style-name="T2">(26/13) </text:span> [ⲛ̅ⲧⲕⲗ̅]ⲗ[ⲉ] ⲛ̅ⲟ̣[ⲩ]ⲛⲁⲙ· ⲃ̅ⲟ̅ⲁ̅ⲃ̅ⲉ̅ⲗ̅ ⲛ̅‐ <text:line-break/><text:span text:style-name="T1"> </text:span><text:span text:style-name="T2">(26/14) </text:span> [ⲛⲉⲥⲧⲏⲃⲉ ⲧ̅ⲣ̅ⲁ̅]̅ⲭ̅ⲟ̅ⲩ̅ ⲛ̅ⲧⲟⲩⲣⲏⲧⲉ̣ [ⲛ̅]‐ <text:line-break/><text:span text:style-name="T1"> </text:span><text:span text:style-name="T2">(26/15) </text:span> [ϭⲃⲟⲩⲣ· ⲫⲓⲕ]ⲛ̣ⲁ ⲛⲛⲉⲥⲧⲏⲃⲉ· ⲙ̅[̅ⲓ̅ⲁ̅ⲙ̅ⲁ̅ⲓ̅] <text:line-break/><text:span text:style-name="T1"> </text:span><text:span text:style-name="T2">(26/16) </text:span> [ⲛ̅ⲉⲓⲉⲓⲃ ⲛ̅ⲛ]ⲟ̣ⲩⲉⲣⲏⲧⲁⲓ· ⲗ̅ⲁ̅ⲃ̅ⲏ̅ⲣ̅[̅ⲛ̅ⲓ̅ⲟ̅ⲩ̅ⲙ̅] <text:line-break/><text:span text:style-name="T1"> </text:span><text:span text:style-name="T2">(26/17) </text:span> [ⲛⲉⲛⲧⲁⲩⲧⲟ]ϣⲟⲩ ⲇⲉ ⲉϩⲣⲁⲓ̈ ⲉϫ̣[ⲛ̅] <text:line-break/><text:span text:style-name="T1"> </text:span><text:span text:style-name="T2">(26/18) </text:span> [ⲛⲁⲓ̈ ⲧⲏ]ⲣ̣ⲟ̣ⲩ̣ [ⲡⲉ] ⲁ̅ⲑ̅ⲱ̅ⲑ̅· ⲁ̅ⲣⲙⲁ̣[ⲥ̅·] <text:line-break/><text:span text:style-name="T1"> </text:span><text:span text:style-name="T2">(26/19) </text:span> [ⲕ̅]̅ⲁ̣̅̅ⲗ̅ⲓ̅ⲗ̅ⲁ̅· ⲓ̅̈ⲁⲃⲏⲗ̅· ⲥ̅ⲁⲃⲁⲱⲑ̅· ⲕ̣̅ⲁ̣̅[ⲓ̈ⲛ̅·] <text:line-break/><text:span text:style-name="T1"> </text:span><text:span text:style-name="T2">(26/20) </text:span> [ⲁ̅ⲃ̅]̅ⲉ̅ⲗ̅· ⲛⲉⲧⲉⲛⲉⲣⲅⲓ ⲇⲉ ⲕⲁⲧⲁ ⲙⲉ̣‐ <text:line-break/><text:span text:style-name="T1"> </text:span><text:span text:style-name="T2">(26/21) </text:span> [ⲣⲟ]ⲥ̣ [ⲛ̅ϩ]ⲣ̣ⲁⲓ̈ ϩⲛ̅ ⲛ̅ⲙⲉⲗⲟⲥ· ⲧⲁⲡ[ⲉ ⲙⲉⲛ] <text:line-break/><text:span text:style-name="T1"> </text:span><text:span text:style-name="T2">(26/22) </text:span> [ⲇ̅ⲓ̅ⲟ̅]̅ⲗ̅ⲓ̣̅̅ⲙ̣̅̅[̅ⲟ̅ⲇ̅ⲣ̅]̅ⲁ̅ⲍ̅ⲁ̅ ⲡⲙⲟⲩⲧ’ ⲓ̅̈ⲁ̣[ⲙⲙⲉⲁⲝ̅] <text:line-break/><text:span text:style-name="T1"> </text:span><text:span text:style-name="T2">(26/23) </text:span> [ⲧ]ⲛ̣ⲁϩⲃⲉ ⲛ̅ⲟ̣ⲩⲛⲁⲙ ⲓ̅̈̅ⲁ̅ⲕ̅ⲟ̅ⲩ̣̅̅[̅ⲓ̅̈̅ⲃ̅ ⲧⲛⲁϩ]‐ <text:line-break/><text:span text:style-name="T1"> </text:span><text:span text:style-name="T2">(26/24) </text:span> [ⲃ]ⲉ̣ ⲛ̣̅ϭⲃⲟ[ⲩ]ⲣ̣ ⲟ̅ⲩ̅ⲉ̅ⲣ̅ⲧ̅ⲱ̅ⲛ [ⲧϭⲓϫ ⲛ̅ⲟⲩ]‐ <text:line-break/><text:span text:style-name="T1"> </text:span><text:span text:style-name="T2">(26/25) </text:span> [ⲛⲁⲙ ⲟ̅]̅ⲩ̅ⲇ̣̅̅ⲉ̅ⲓ̅ⲇ̅ⲓ̅· ⲧϭⲃⲟⲩⲣ ⲁ̅ⲣ[ⲃⲁⲟ̅ ⲛ̅]‐ <text:line-break/><text:span text:style-name="T1"> </text:span><text:span text:style-name="T2">(26/26) </text:span> [ⲧⲏⲃⲉ] ⲛ̅ⲧϭⲓϫ ⲛ̣̅ⲟⲩⲛⲁⲙ· ⲗ̅ⲁ̅ⲙ̅ⲡ̣̅̅[̅ⲛ̅ⲱ̅] <text:line-break/><text:span text:style-name="T1"> </text:span><text:span text:style-name="T2">(26/27) </text:span> [ⲛ̅ⲧⲏⲃ]ⲉ̣ ⲛ̅ⲧϭ̣[ⲓ]ϫ̣ ⲛ̅ϩⲃⲟⲩⲣ ⲗ̅ⲏ̅ⲉ̣̅̅[̅ⲕ̅ⲁ̅ⲫ̅ⲁ̅ⲣ̅] <text:line-break/><text:soft-page-break/><text:span text:style-name="T1"> </text:span><text:span text:style-name="T2">(26/28) </text:span> [ⲧⲕⲓⲃⲉ ⲛ̅ⲟⲩⲛ]ⲁ̣ⲙ ⲃ̅ⲁ̅ⲣ̅ⲃ̅ⲁ̅ⲣ̅ ⲧⲕ̣[ⲓⲃⲉ ⲛ̅]‐ <text:line-break/><text:span text:style-name="T1"> </text:span><text:span text:style-name="T2">(26/29) </text:span> [ϭⲃⲟⲩⲣ ⲓ̅̈̅]̅ⲙ̅ⲁ̣̅̅ⲏ̣̅̅ ⲧⲙⲉⲥ̣ⲑⲏⲧ’ ⲡ̣̅[ⲓⲥⲁⲛ̅]‐ <text:line-break/><text:span text:style-name="T1"> </text:span><text:span text:style-name="T2">(26/30) </text:span> [ⲇ̅ⲣ̅ⲁ̅ⲡ̅ⲧ̅]̅ⲏ̅ⲥ̅ ⲡϫⲟ ⲛ̅[ⲟ]ⲩ̣ⲛⲁ[ⲙ ⲕ̅ⲟⲁⲇⲏ̅] <text:line-break/><text:span text:style-name="T1"> </text:span><text:span text:style-name="T2">(26/31) </text:span> [ⲡϫⲟ ⲛ̅ϭ]ⲃ̣ⲟⲩⲣ ⲟ̅ⲇ̅ⲉ̅ⲱ̣̅̅[̅ⲣ̅ ⲡⲥⲡⲓⲣ] <text:line-break/><text:span text:style-name="T1"> </text:span><text:span text:style-name="T2">(27/1) </text:span> ⲛ̅ⲟⲩⲛⲁⲙ ⲁ̅ⲥ̅ⲫ̅ⲓ̅ⲝ̅ⲝ̅ⲓ̅ⲝ̅ ⲡⲥⲡⲓⲣ ⲛ̅ϭⲃⲟ̣[ⲩⲣ] <text:line-break/><text:span text:style-name="T1"> </text:span><text:span text:style-name="T2">(27/2) </text:span> ⲥ̅ⲟ̅ⲩ̅ⲛ̅ⲟ̅ⲅ̅ⲭ̅ⲟ̅ⲩ̅ⲧ̅ⲁ̅ ⲧⲕⲟⲓⲗⲓⲁ ⲁ̅ⲣⲟ̣ⲩⲫ̅ <text:line-break/><text:span text:style-name="T1"> </text:span><text:span text:style-name="T2">(27/3) </text:span> ⲡⲉⲕⲟⲩⲛϥ̅ ⲥ̅ⲁ̅ⲃ̣̅̅ⲁ̅ⲗ̅ⲱ̅· ⲡⲙⲏⲣⲟⲥ̣ [ⲛ̅ⲟⲩ]‐ <text:line-break/><text:span text:style-name="T1"> </text:span><text:span text:style-name="T2">(27/4) </text:span> [ⲛⲁ]ⲙ ⲭ̅ⲁ̅ⲣ̅ⲭ̅ⲁ̣̅̅[̅ⲣ̅ⲃ̅] ⲡ̣ⲙⲏⲣⲟⲥ ⲛ̅ϭⲃⲟⲩⲣ <text:line-break/><text:span text:style-name="T1"> </text:span><text:span text:style-name="T2">(27/5) </text:span> [ⲭ̅ⲑ̅]̅ⲁ̅ⲱ̅· ⲛ̅ⲁⲓⲇ[ⲟ]ⲓ̣ⲟ̣ⲛ ⲧⲏⲣⲟⲩ ⲑ̅ⲁⲃⲓⲛⲱ̣[ⲑ̅· ⲡ̅’]‐ <text:line-break/><text:span text:style-name="T1"> </text:span><text:span text:style-name="T2">(27/6) </text:span> [ⲡⲉ]ⲧ’ ⲛ̅ⲟⲩⲛⲁ[ⲙ ⲭ̅]̅ⲟ̅ⲩ̅ⲝ̣̅̅ ⲡ̅’̣ⲡⲉⲧ’ ⲛ̅ϭⲃ[ⲟⲩⲣ] <text:line-break/><text:span text:style-name="T1"> </text:span><text:span text:style-name="T2">(27/7) </text:span> [ⲭ̅ⲁ̅]̅ⲣ̣̅̅ⲭ̅ⲁ̅ ⲧⲥⲏ[ⲃⲉ ⲛ̅ⲟ̣[ⲩⲛⲁⲙ ⲁ̅ⲣ]ⲟ[ⲏⲣ̅·] <text:line-break/><text:span text:style-name="T1"> </text:span><text:span text:style-name="T2">(27/8) </text:span> [ⲧⲥ]ⲏⲃⲉ ⲛ̅ϭⲃⲟⲩⲣ̣ [ⲧ̅ⲱ̅ⲉ̅ⲭ̅ⲑ̅ⲁ̅· ⲧⲕⲗ̅ⲗⲉ] <text:line-break/><text:span text:style-name="T1"> </text:span><text:span text:style-name="T2">(27/9) </text:span> [ⲛ̅ⲟ]ⲩⲛⲁⲙ ⲁ̅ⲱ̅[̅ⲗ̅ ⲧⲕⲗ̅ⲗⲉ] ⲛ̣̅ϭ̣ⲃ[ⲟⲩⲣ] <text:line-break/><text:span text:style-name="T1"> </text:span><text:span text:style-name="T2">(27/10) </text:span> [ⲭ̅ⲁ̅ⲣ̅ⲁ̅]̅ⲛ̣̅̅ⲏ̅ⲣ̅· ⲧ̣[ⲟⲩⲉⲣⲏⲧⲉ ⲛ̅]ⲛⲟⲩⲛ̣[ⲁⲙ] <text:line-break/><text:span text:style-name="T1"> </text:span><text:span text:style-name="T2">(27/11) </text:span> [ⲃ̅ⲁ̅ⲥ̅ⲧ̅ⲁ̅ⲛ̅] ⲛⲉ[ⲥⲧⲏⲃⲉ ⲁ̅ⲣⲭⲉ]ⲛⲧⲉⲭ[ⲑⲁ̅] <text:line-break/><text:span text:style-name="T1"> </text:span><text:span text:style-name="T2">(27/12) </text:span> [ⲧⲟⲩⲉⲣⲏⲧⲉ ⲛ̅ϭⲃⲟⲩⲣ ⲙ̅ⲁ̅ⲣ̅ⲉ̅]̅ⲫ̅[̅ⲛ̅ⲟ̅ⲩ̅ⲛ̅ⲑ̅] <text:line-break/><text:span text:style-name="T1"> </text:span><text:span text:style-name="T2">(27/13) </text:span> [ⲛⲉⲥⲧⲏⲃⲉ ⲁ̅ⲃ̅ⲣ̅ⲁ̅ⲛ̅ⲁ̅· ⲛⲉⲩϭⲙ̅ϭⲟⲙ] <text:line-break/><text:span text:style-name="T1"> </text:span><text:span text:style-name="T2">(27/14) </text:span> [ⲉϩⲣⲁⲓ̈ {ϩ̅ⲓ}ϫⲛ̅ ⲛⲁⲓ̈ ⲧⲏⲣⲟⲩ ⲛ̅]ϭ̣ⲓ̣ ⲥ̣ⲁ̣[ϣϥ̅] <text:line-break/><text:span text:style-name="T1"> </text:span><text:span text:style-name="T2">(27/15) </text:span> [ⲍ̅ ⲙ̅ⲓ̅ⲭ̅]̅ⲁ̅[̅ⲏ̅ⲗ̅· ⲟ̅ⲩⲣⲓⲏⲗ̅· ⲁ̅ⲥⲙⲉ]ⲛ̣ⲉⲇ̣[ⲁⲥ̅·] <text:line-break/><text:span text:style-name="T1"> </text:span><text:span text:style-name="T2">(27/16) </text:span> [̅ⲥ̅ⲁ̅ⲫ̅ⲁ̅ⲥ̅]̅ⲁ̅ⲧ̅ⲟ̅[̅ⲏ̅ⲗ̅· ⲁ̅ⲁⲣⲙⲟⲩⲣⲓⲁⲙ̅· ⲣ̅]ⲓ̣ⲭ̣ⲣ̣[ⲁⲙ̅·] <text:line-break/><text:span text:style-name="T1"> </text:span><text:span text:style-name="T2">(27/17) </text:span> [ⲁ̅ⲙ̅ⲓ̅ⲱ̅ⲣ̅]̅ⲯ̣̅̅ [ⲁⲩⲱ ⲛⲉⲧ’{ϩⲓ}ϫⲛ̅] ⲛ̣̅ⲁ̣[ⲓⲥⲑⲏⲥⲓⲥ] <text:line-break/><text:span text:style-name="T1"> </text:span><text:span text:style-name="T2">(27/18) </text:span> ⲁⲣⲭⲉⲛⲇⲉⲕⲧⲁ· [ⲁⲩⲱ ⲡⲉ]ⲧ’̣〈ϩⲓ}ϫⲛ̅ [ⲧⲁⲛⲁ]‐ <text:line-break/><text:span text:style-name="T1"> </text:span><text:span text:style-name="T2">(27/19) </text:span> [ⲗⲏⲙⲯⲓⲥ ⲇ̅ⲉ̅ⲓ̅ⲑ̅ⲁ̅ⲣ̅ⲃ̅ⲁ̅ⲑ̅ⲁ̅ⲥ̅]· ⲁ[ⲩⲱ ⲡⲉⲧ’]‐ <text:line-break/><text:span text:style-name="T1"> </text:span><text:span text:style-name="T2">(27/20) </text:span> [{ϩ̅ⲓ}ϫⲛ̅ ⲧⲫⲁⲛⲧⲁⲥⲓⲁ· ⲟ̅ⲩⲙ]ⲙⲁⲁ̅ <text:line-break/><text:span text:style-name="T1"> </text:span><text:span text:style-name="T2">(27/21) </text:span> [ⲁⲩⲱ ⲡⲉⲧ’{ϩ̅ⲓ}ϫⲛ̅ ⲡϫⲱ]ⲛϥ̣̅ ⲁ̅ⲭⲓⲁ[ⲣⲁⲙ̅] <text:line-break/><text:span text:style-name="T1"> </text:span><text:span text:style-name="T2">(27/22) </text:span> [ⲁⲩⲱ ⲡⲉⲧ’{ϩ̅ⲓ}ϫⲛ̅ ⲧϩⲟⲣ]ⲙ̣ⲏ ⲧⲏⲣⲥ̣̅ <text:line-break/><text:span text:style-name="T1"> </text:span><text:span text:style-name="T2">(27/23) </text:span> [ⲣ̅ⲓ̅ⲁ̅ⲣ̅ⲁ̅ⲙ̅ⲛ̅ⲁ̅ⲭ̅ⲱ̅· ⲧⲡⲏⲅ]ⲏ̣ ⲇ̣[ⲉ ⲛ̅ⲛⲓ] <text:line-break/><text:span text:style-name="T1"> </text:span><text:span text:style-name="T2">(27/24) </text:span> (Lines 24 to the end are missing) <text:line-break/><text:span text:style-name="T1"> </text:span><text:span text:style-name="T2">(28/1) </text:span> ⲉϫⲙ̅ ⲡⲁⲣⲟϣ ⲟ̅ⲣ̅ⲟ̅ⲟ̅ⲣ̅ⲣ̅ⲟ̅ⲑ̅ⲟ̅ⲥ̅ ⲡⲉⲧⲟ <text:line-break/><text:span text:style-name="T1"> </text:span><text:span text:style-name="T2">(28/2) </text:span> ⲇⲉ ⲛ̅ϫⲟⲉⲓⲥ ⲉϫⲛ̅ ⲡⲉⲧ’ϣⲟⲩⲱⲟⲩ <text:line-break/><text:span text:style-name="T1"> </text:span><text:span text:style-name="T2">(28/3) </text:span> [ⲉ̅]̅ⲣ̣̅̅[̅ⲓ̅]̅ⲙ̅ⲁ̅ⲭ̅ⲱ̅· ⲡⲉⲧⲟ ⲇⲉ ⲛ̅ϫⲟⲉⲓⲥ ⲉ̣[ϫⲙ̅] <text:line-break/><text:span text:style-name="T1"> </text:span><text:span text:style-name="T2">(28/4) </text:span> [ⲡ]ⲱϭⲃ̅ ⲁ̅ⲑ̅ⲩ̅ⲣ̅ⲱ̅· ⲧ[ⲙⲁ]ⲁ̣ⲩ ⲇⲉ ⲛ̅ⲛⲁ̣[ⲓ̈] <text:line-break/><text:span text:style-name="T1"> </text:span><text:span text:style-name="T2">(28/5) </text:span> ⲧⲏⲣⲟⲩ ⲥⲁϩⲉⲣⲁⲧ̣ⲥ̣̅ ⲛ̣̅[ⲧ]ⲉⲩⲙⲏⲧⲉ· <text:line-break/><text:span text:style-name="T1"> </text:span><text:span text:style-name="T2">(28/6) </text:span> ⲟ̅ⲛ̅ⲟ̅ⲣ̅ⲑ̅ⲟ̅ⲭ̅ⲣ̅ⲁ̅ⲥ̅ ⲧⲁ̣[ⲓ̈ ⲉⲥ]ϣⲟⲟⲡ’ ⲅⲁⲣ [ⲛ̅]‐ <text:line-break/><text:span text:style-name="T1"> </text:span><text:span text:style-name="T2">(28/7) </text:span> ⲁⲧ’ⲧⲟϣ̣[ⲥ̅ ⲁⲩⲱ ⲥ]ⲧ̣ⲏ̣ϩ ⲛⲙ̅ⲙⲁⲩ [ⲧⲏ]‐ <text:line-break/><text:span text:style-name="T1"> </text:span><text:span text:style-name="T2">(28/8) </text:span> ⲣ̣[ⲟ]ⲩ· ⲁ̣[ⲩⲱ ⲧⲁⲓ̈ ⲛ]ⲁ̣ⲙ[ⲉ ⲧ]ⲉ ⲧ’ⲑⲩⲗⲏ̣ [ⲉⲩ]‐ <text:line-break/><text:span text:style-name="T1"> </text:span><text:span text:style-name="T2">(28/9) </text:span> [ⲥⲁⲛⲁϣⲧ̅’ ⲅⲁⲣ ⲉⲃⲟⲗ] {ϩ̣̅̅ⲓ}ⲧ̣ⲟⲟⲧⲥ̅· ⲡ[ϥⲧⲟ]‐ <text:line-break/><text:span text:style-name="T1"> </text:span><text:span text:style-name="T2">(28/10) </text:span> [ⲟⲩ ⲛ̅]ⲁ̣ⲣⲭⲏ̣[ⲅⲟⲥ ⲛ̅ⲇⲁⲓ]ⲙⲱⲛ ⲉ̅ⲫ̣̅̅[̅ⲉ̅ⲙ̅ⲉ̅ⲙ̅ⲫ̅ⲓ̅] <text:line-break/><text:span text:style-name="T1"> </text:span><text:span text:style-name="T2">(28/11) </text:span> [ⲡⲉ] ⲡⲁⲧ’ϩ[ⲏⲇⲟⲛⲏ· ⲓ̅̈̅ⲱ̅]̅ⲕ̅[̅ⲱ̅ ⲡⲉ ⲡⲁ]‐ <text:line-break/><text:span text:style-name="T1"> </text:span><text:span text:style-name="T2">(28/12) </text:span> [ⲧⲉ]ⲡⲓⲑⲩⲙ̣[ⲉⲓⲁ ⲛⲉⲛⲉⲛⲧⲱⲫⲛⲓ ⲡⲉ] <text:line-break/><text:span text:style-name="T1"> </text:span><text:span text:style-name="T2">(28/13) </text:span> [ⲡⲁⲧ’ⲗ]ⲩⲡ[ⲏ· ⲃⲗⲁⲟⲙⲏⲛ ⲡⲉ ⲡⲁⲑⲣ̅ⲧⲉ] <text:line-break/><text:span text:style-name="T1"> </text:span><text:span text:style-name="T2">(28/14) </text:span> [ⲧⲟⲩⲙ]ⲁ̣[ⲁⲩ ⲇⲉ ⲧⲏⲣⲟⲩ ⲉ̅ⲥ̅ⲑ̅ⲏ̅ⲛ̅] <text:line-break/><text:span text:style-name="T1"> </text:span><text:span text:style-name="T2">(28/15) </text:span> [ⲥⲓ̅]̅ⲍ̅ⲟ̅ⲩ̅ⲭ̣̅̅ [ⲉ̅ⲡⲓⲡⲧⲟⲏ̅· ⲉⲃⲟⲗ ⲇⲉ ϩⲛ̅ <text:line-break/><text:span text:style-name="T1"> </text:span><text:span text:style-name="T2">(28/16) </text:span> [ⲡϥ]ⲧⲟⲟ̣[ⲩ ⲛ̅ⲇⲁⲓⲙⲱⲛ] ⲁ[ⲩϣⲱⲡⲉ] <text:line-break/><text:span text:style-name="T1"> </text:span><text:span text:style-name="T2">(28/17) </text:span> [ⲛ̅]ϭ̣ⲓ̣ ϩ̣[ⲉⲛⲡⲁⲑⲟⲥ ⲉⲃⲟⲗ] ⲇⲉ ϩ̣[ⲛ̅ ⲧⲗⲩ]‐ <text:line-break/><text:span text:style-name="T1"> </text:span><text:span text:style-name="T2">(28/18) </text:span> [ⲡⲏ· ⲟ]ⲩⲫ[ⲑⲟⲛⲟⲥ· ⲟⲩⲕⲱϩ· ⲟⲩⲙ̅]‐ <text:line-break/><text:span text:style-name="T1"> </text:span><text:span text:style-name="T2">(28/19) </text:span> [ⲕⲁϩ·] ⲟⲩⲟ̣[ⲭⲗⲏⲥⲓⲥ· ⲟⲩⲛⲁⲁⲕⲉ·] <text:line-break/><text:soft-page-break/><text:span text:style-name="T1"> </text:span><text:span text:style-name="T2">(28/20) </text:span> [ⲟⲩ]ⲙ̅ⲛ̅ⲧ̅’̅ⲁ[ⲧ’ⲣ̅ϩⲧⲏϥ· ⲟⲩⲣⲟⲟⲩϣ·] <text:line-break/><text:span text:style-name="T1"> </text:span><text:span text:style-name="T2">(28/21) </text:span> [ⲟⲩ]ϩⲏⲃⲉ ⲁ̣[ⲩⲱ ⲡⲕⲉϣⲱϫⲡ̅’·] <text:line-break/><text:span text:style-name="T1"> </text:span><text:span text:style-name="T2">(28/22) </text:span> [ⲉⲃ]ⲟ̣ⲗ ⲇⲉ ϩⲛ̅ [ⲧϩⲏⲇⲟⲛⲏ ϣⲁⲩ]‐ <text:line-break/><text:span text:style-name="T1"> </text:span><text:span text:style-name="T2">(28/23) </text:span> ϣ̣ⲱ̣ⲡ[ⲉ] ⲛ̅[ϭⲓ ϩⲁϩ ⲛ̅ⲕⲁⲕⲓⲁ· ⲁⲩⲱ] <text:line-break/><text:span text:style-name="T1"> </text:span><text:span text:style-name="T2">(28/24) </text:span> (Lines 24 to the end are missing) <text:line-break/><text:span text:style-name="T1"> </text:span><text:span text:style-name="T2">(29/1) </text:span> ⲑⲣ̅ⲧⲉ ⲟⲩⲉⲕⲡⲗⲏⲝⲓⲥ ⲟⲩⲕⲱⲣϣ̅ <text:line-break/><text:span text:style-name="T1"> </text:span><text:span text:style-name="T2">(29/2) </text:span> ⲟⲩⲁⲅⲱⲛⲓⲁ· ⲟⲩϣⲓⲡⲉ· ⲛⲁⲓ̈ ⲇⲉ <text:line-break/><text:span text:style-name="T1"> </text:span><text:span text:style-name="T2">(29/3) </text:span> ⲧ̣ⲏⲣⲟⲩ ⲛ̅ⲑⲉ ⲛ̅ϩⲉⲛⲡⲉⲧⲣ̅ϣⲁⲩ <text:line-break/><text:span text:style-name="T1"> </text:span><text:span text:style-name="T2">(29/4) </text:span> [ⲙⲛ̅] ⲙ̅ⲡⲉ̣ⲧ̣[ϩⲟⲟ]ⲩ· ⲧⲉⲛⲛⲟⲓⲁ ⲇⲉ <text:line-break/><text:span text:style-name="T1"> </text:span><text:span text:style-name="T2">(29/5) </text:span> [ⲛ̅ⲧⲉ ⲧⲟⲩⲙⲉ ⲧⲉ] ⲁ̣̅̅ⲛ̣̅̅[̅ⲁ̅ⲣ̅ⲱ̅ ⲉⲧⲉ ⲧⲁⲓ̈] <text:line-break/><text:span text:style-name="T1"> </text:span><text:span text:style-name="T2">(29/6) </text:span> (Lines 6-14 are missing) <text:line-break/><text:span text:style-name="T1"> </text:span><text:span text:style-name="T2">(29/15) </text:span> [ⲕⲟⲟⲩ]ⲉ {ϩ̣̅̅[̅ⲓ}ϫⲙ̅ ⲡⲕⲉϣⲱϫⲡ̅’ ⲙ̅ⲡⲁⲑⲟⲥ] <text:line-break/><text:span text:style-name="T1"> </text:span><text:span text:style-name="T2">(29/16) </text:span> [ⲛⲁⲓ̈ ⲉ]ⲧⲉ ⲙ̣̅[ⲡⲓϫⲟⲟⲩ ⲛⲁⲕ ⲉϣϫⲉ] <text:line-break/><text:span text:style-name="T1"> </text:span><text:span text:style-name="T2">(29/17) </text:span> [ⲕⲟⲩⲱϣⲉ ⲇⲉ ⲉⲙⲙⲉ ⲉ]ⲣⲟⲟⲩ̣ [ϥⲥⲏϩ] <text:line-break/><text:span text:style-name="T1"> </text:span><text:span text:style-name="T2">(29/18) </text:span> [ϩⲙ̅ ⲡϫⲱⲙⲉ ⲛ̅ⲍⲱⲣⲟ]ⲁⲥⲧ[ⲣⲟⲥ·] <text:line-break/><text:span text:style-name="T1"> </text:span><text:span text:style-name="T2">(29/19) </text:span> [ⲁⲩⲣ̅ ϩⲱⲃ ⲇⲉ ⲧⲏⲣⲟⲩ] ⲛ̅ϭⲓ [ⲛⲓⲁⲅ’]‐ <text:line-break/><text:span text:style-name="T1"> </text:span><text:span text:style-name="T2">(29/20) </text:span> [ⲅⲉⲗⲟⲥ ⲙⲛ̅ ⲛ̅ⲇⲁⲓⲙ]ⲱ̣ⲛ ϣ̣[ⲁⲛ]‐ <text:line-break/><text:span text:style-name="T1"> </text:span><text:span text:style-name="T2">(29/21) </text:span> [ⲧⲟⲩⲧⲉⲛⲟ ⲙ̅ⲯⲩⲭⲓⲕⲟ]ⲛ̣ ⲛ̅ⲥ[ⲱⲙⲁ] <text:line-break/><text:span text:style-name="T1"> </text:span><text:span text:style-name="T2">(29/22) </text:span> [ⲁⲩⲱ ⲁϥϣⲱⲡⲉ ⲧⲏⲣ]ϥ̣̅ ⲛ̅ϭⲓ ⲡⲟ[ⲩϩⲱϥ] <text:line-break/><text:span text:style-name="T1"> </text:span><text:span text:style-name="T2">(29/23) </text:span> [ⲛ̅ⲁⲣⲅⲟⲛ ⲁⲩⲱ ⲛ̅ⲁⲧ’]ⲕⲓⲙ ϩⲛ̅ ⲟⲩ‐ <text:line-break/><text:span text:style-name="T1"> </text:span><text:span text:style-name="T2">(29/24) </text:span> [ⲛⲟϭ ⲛ̅ⲟⲩⲟⲉⲓϣ· ⲧ]ⲙⲁ̣ⲁⲩ ⲇⲉ ⲛ̣̅‐ <text:line-break/><text:span text:style-name="T1"> </text:span><text:span text:style-name="T2">(29/25) </text:span> [ⲧⲉⲣⲉⲥⲟⲩⲱϣⲉ ⲉϫⲓ] ⲛ̣̅[ⲧ]ϭⲟⲙ [ⲛ̅ⲧ]ⲁ̣ⲥ <text:line-break/><text:span text:style-name="T1"> </text:span><text:span text:style-name="T2">(29/26) </text:span> [ⲧⲁⲁⲥ ⲙ̅ⲡⲓϣⲟⲣⲡ̅’ ⲛ̅ⲁⲣ]ⲭⲱ[ⲛ· ⲁⲥⲥⲟⲡⲥ̅] <text:line-break/><text:span text:style-name="T1"> </text:span><text:span text:style-name="T2">(29/27) </text:span> [ⲙ̅ⲡⲙⲏⲧⲣⲟⲡⲁⲧⲱⲣ ⲙ̅ⲡⲧⲏⲣϥ̅ ⲡⲁⲡⲛⲟϭ ⲛ̅ⲛⲁ ⲁϥⲧⲛ̅]‐ <text:line-break/><text:span text:style-name="T1"> </text:span><text:span text:style-name="T2">(30/1) </text:span> ⲛⲟⲟⲩ ⲛ̅ϯⲟⲩ ⲙ̅ⲫⲱⲥⲧⲏⲣ ϩⲙ̅ ⲡϣⲟ‐ <text:line-break/><text:span text:style-name="T1"> </text:span><text:span text:style-name="T2">(30/2) </text:span> ϫⲛⲉ ⲉⲧⲟⲩⲁⲁⲃ ⲉϩⲣⲁⲓ̈ ⲉϫⲛ̅ ⲡⲧⲟⲡⲟⲥ <text:line-break/><text:span text:style-name="T1"> </text:span><text:span text:style-name="T2">(30/3) </text:span> ⲛ̅ⲛ̅ⲁⲅⲅⲉⲗⲟⲥ ⲙ̅ⲡⲣⲱ̣ⲧⲁⲣⲭⲱⲛ·{ⲁⲩ} <text:line-break/><text:span text:style-name="T1"> </text:span><text:span text:style-name="T2">(30/4) </text:span> ⲁ̣ⲩϫⲓ ϣⲟϫⲛⲉ ⲛⲁ[ϥ ϩⲱ]ⲥ̣ⲧⲉ ⲉⲧ[ⲟⲩ]‐ <text:line-break/><text:span text:style-name="T1"> </text:span><text:span text:style-name="T2">(30/5) </text:span> ⲉⲓⲛⲉ ⲉⲃⲟⲗ ⲛ̅ⲧϭⲟ̣ⲙ̣ [ⲛ̅ⲧⲙⲁⲁⲩ· ⲁⲩⲱ] <text:line-break/><text:span text:style-name="T1"> </text:span><text:span text:style-name="T2">(30/6) </text:span> (Lines 6-15 are missing) <text:line-break/><text:span text:style-name="T1"> </text:span><text:span text:style-name="T2">(30/16) </text:span> [ⲕⲁⲧⲁ ⲡⲓⲛⲉ ⲙ̅ⲡⲉⲧ’ϣⲟⲟ]ⲡ’ ϫ̣[ⲛ̅ ⲛ̅]‐ <text:line-break/><text:span text:style-name="T1"> </text:span><text:span text:style-name="T2">(30/17) </text:span> [ϣⲟⲣⲡ̅’ ⲁϥⲕⲓⲙ· ⲁⲩⲱ ⲁ]ϥ̣ϭ̣ⲙ̣̅[ϭⲟⲙ] <text:line-break/><text:span text:style-name="T1"> </text:span><text:span text:style-name="T2">(30/18) </text:span> [ⲛ̅ϭⲓ] ⲡⲥⲱ̣[ⲙⲁ· ⲁⲩⲱ ⲁϥⲣ̅ ⲟⲩⲟⲉⲓⲛ·] <text:line-break/><text:span text:style-name="T1"> </text:span><text:span text:style-name="T2">(30/19) </text:span> [ⲁⲩ]ⲱ̣ ⲁⲩ[ⲕⲱϩ ϩ̣ⲛ̅ ⲧⲉⲩⲛⲟⲩ ⲉⲧⲙ̅]‐ <text:line-break/><text:span text:style-name="T1"> </text:span><text:span text:style-name="T2">(30/20) </text:span> [ⲙⲁ]ⲩ̣ ⲛ̅ϭ[ⲓ ⲡⲕⲉⲥⲉⲉⲡⲉ ⲛ̅ⲇⲩⲛⲁ]‐ <text:line-break/><text:span text:style-name="T1"> </text:span><text:span text:style-name="T2">(30/21) </text:span> [ⲙⲓⲥ] ϫ̣ⲉ ⲛ̅[ⲧⲁϥϣⲱⲡⲉ ⲅⲁⲣ ⲉⲃⲟⲗ] <text:line-break/><text:span text:style-name="T1"> </text:span><text:span text:style-name="T2">(30/22) </text:span> [{ϩ̅ⲓ}ⲧ]ⲟ̣ⲟ̣[ⲧⲟⲩ ⲧⲏⲣⲟⲩ· ⲁⲩⲱ ⲁⲩϯ ⲛ̅]‐ <text:line-break/><text:span text:style-name="T1"> </text:span><text:span text:style-name="T2">(30/23) </text:span> [ⲧ]ⲉ̣ⲩϭⲟⲙ [ⲙ̅ⲡⲣⲱⲙⲉ· ⲁⲩⲱ ⲁⲥ]‐ <text:line-break/><text:span text:style-name="T1"> </text:span><text:span text:style-name="T2">(30/24) </text:span> ⲧ̣ⲁϫⲣⲟ ⲛ̣̅ϭ̣[ⲓ ⲧⲉϥⲙ̅ⲛ̅ⲧ̅’̅ⲣ̅ⲙ̅ⲛ̅ϩⲏⲧ’] <text:line-break/><text:span text:style-name="T1"> </text:span><text:span text:style-name="T2">(30/25) </text:span> ⲛ̅ϩⲟⲩⲟ ⲉⲛⲉ̣[ⲧⲁϩⲧⲁⲙⲓⲟϥ· ⲁⲩⲱ] <text:line-break/><text:span text:style-name="T1"> </text:span><text:span text:style-name="T2">(30/26) </text:span> ⲛ̅ϩⲟ̣ⲩⲟ̣ [ⲉ]ⲡ̣[ϣⲟⲣⲡ̅’ ⲛ̅ⲁⲣⲭⲱⲛ ⲛ̅]‐ <text:line-break/><text:span text:style-name="T1"> </text:span><text:span text:style-name="T2">(30/27) </text:span> [ⲧⲉⲣ]ⲟ̣ⲩⲙ̅ⲙ[ⲉ ⲇⲉ ϫⲉ ϥⲟ ⲛ̅ⲟⲩⲟⲉⲓⲛ] <text:line-break/><text:span text:style-name="T1"> </text:span><text:span text:style-name="T2">(30/28) </text:span> [ⲁⲩⲱ ϥⲙⲉⲉⲩⲉ ⲛ̅ϩⲟⲩⲟ ⲉⲣⲟⲟⲩ] <text:line-break/><text:span text:style-name="T1"> </text:span><text:span text:style-name="T2">(30/29) </text:span> [ⲁⲩⲱ ϥⲕⲏⲕ ⲁϩⲏⲟⲩ ⲉⲃⲟⲗ] <text:line-break/><text:span text:style-name="T1"> </text:span><text:span text:style-name="T2">(31/1) </text:span> ⲛ̅ⲧⲕⲁⲕⲓⲁ· ⲁⲩϥⲓ ⲙ̅ⲙⲟϥ ⲁⲩⲛⲟϫϥ̅ ⲉ‐ <text:line-break/><text:span text:style-name="T1"> </text:span><text:span text:style-name="T2">(31/2) </text:span> ⲡⲓⲧⲛ̅ ⲁⲡⲙⲉⲣⲟⲥ ⲉⲧⲙ̅ⲡⲥⲁ ⲙ̅ⲡⲓⲧ[ⲛ̅] <text:line-break/><text:span text:style-name="T1"> </text:span><text:span text:style-name="T2">(31/3) </text:span> ⲛ̣̅ⲑⲩⲗⲏ ⲧⲏⲣⲥ̣̅ ⲡⲙⲁⲕⲁⲣⲓⲟⲥ ⲇⲉ <text:line-break/><text:soft-page-break/><text:span text:style-name="T1"> </text:span><text:span text:style-name="T2">(31/4) </text:span> [ⲡ]ⲙⲏⲧⲣⲟⲡ[ⲁⲧⲱⲣ] ⲡⲣⲉϥⲣ̅ⲡⲉⲧⲛⲁ‐ <text:line-break/><text:span text:style-name="T1"> </text:span><text:span text:style-name="T2">(31/5) </text:span> [ⲛ]ⲟⲩϥ ⲁⲩⲱ [ⲡϣⲁ]ⲛϩⲧⲏϥ ⲁϥϣⲛ̅‐ <text:line-break/><text:span text:style-name="T1"> </text:span><text:span text:style-name="T2">(31/6) </text:span> [ϩ]ⲧ̣ⲏϥ ⲉϩⲣⲁⲓ̈ ⲁ̣[ϫⲛ̅ ⲧⲇⲩⲛⲁ]ⲙ̣ⲓⲥ ⲛ̅ⲧⲙⲁ‐ <text:line-break/><text:span text:style-name="T1"> </text:span><text:span text:style-name="T2">(31/7) </text:span> ⲁⲩ· ⲧⲁⲓ̈ ⲛ̅[ⲧⲁⲩⲛ̅ⲧⲥ̅ ⲉⲃⲟⲗ {ϩ̅ⲓ}]ⲧⲛ̅ [ⲡⲣⲱ]‐ <text:line-break/><text:span text:style-name="T1"> </text:span><text:span text:style-name="T2">(31/8) </text:span> ⲧ̣ⲁ̣ⲣⲭ̣ⲱ̣ⲛ̣· [ⲁⲩⲱ ⲟⲛ ϫⲉ ⲥⲉⲛⲁϭⲙϭⲟⲙ] <text:line-break/><text:span text:style-name="T1"> </text:span><text:span text:style-name="T2">(31/9) </text:span> (Lines 9-14 are missing) <text:line-break/><text:span text:style-name="T1"> </text:span><text:span text:style-name="T2">(31/15) </text:span> [ϩⲏⲧ]ϥ̣̅ [ⲧⲉ ⲉⲁⲩⲙⲟⲩⲧⲉ ⲉⲣⲟⲥ ϫⲉ] <text:line-break/><text:span text:style-name="T1"> </text:span><text:span text:style-name="T2">(31/16) </text:span> [ⲍ̅ⲱ̅ⲏ̅·] ⲧⲁⲓ̣̈ [ⲇⲉ ⲉⲥⲣ̅ϩⲟⲩⲡⲟⲩⲣⲅⲓ ⲛ̅ⲧ’]‐ <text:line-break/><text:span text:style-name="T1"> </text:span><text:span text:style-name="T2">(31/17) </text:span> [ⲧⲕⲧⲓⲥⲓⲥ ⲧⲏⲡⲥ̅ ⲉⲥϣⲡ̅’] {ϩ̣̅̅ⲓ̣̅}ⲥ̣[ⲉ ⲛⲙ̅ⲙⲁϥ] <text:line-break/><text:span text:style-name="T1"> </text:span><text:span text:style-name="T2">(31/18) </text:span> [ⲁⲩⲱ ⲉⲥⲥⲱϩⲉ ⲙ̅ⲙ]ⲟ̣ϥ ⲉ̣[ϩⲟⲩⲛ] <text:line-break/><text:span text:style-name="T1"> </text:span><text:span text:style-name="T2">(31/19) </text:span> [ⲉⲡⲉϥⲡⲗⲏⲣⲱⲙⲁ· ⲁ]ⲩⲱ [ⲉⲥⲧⲥⲁ]‐ <text:line-break/><text:span text:style-name="T1"> </text:span><text:span text:style-name="T2">(31/20) </text:span> [ⲃⲟ ⲙ̅ⲙⲟϥ ⲉⲧⲉϥϭⲓ]ⲛ̣{ⲉ̅ⲓ̣̅} [ⲉⲡⲓⲧⲛ̅] <text:line-break/><text:span text:style-name="T1"> </text:span><text:span text:style-name="T2">(31/21) </text:span> [ⲙ̅ⲡⲥⲡⲉⲣⲙⲁ ⲉⲥⲧⲥ]ⲁ̣ⲃⲟ̣ ⲙ̣̅[ⲙⲟϥ] <text:line-break/><text:span text:style-name="T1"> </text:span><text:span text:style-name="T2">(31/22) </text:span> [ⲉⲡⲙⲁⲉⲓⲧ’ ⲛ̅ⲃⲱⲕ ⲉϩ]ⲣ̣ⲁⲓ̈· ⲡ[ⲙⲁ]‐ <text:line-break/><text:span text:style-name="T1"> </text:span><text:span text:style-name="T2">(31/23) </text:span> [ⲉⲓⲧ’ ⲛ̅ⲧⲁϥ{ⲉ̅ⲓ} ⲉϩⲣⲁⲓ̈] ⲙ̣̅ⲙⲁⲩ[·] <text:line-break/><text:span text:style-name="T1"> </text:span><text:span text:style-name="T2">(31/24) </text:span> [ⲁⲩⲱ ⲧⲉⲡⲓⲛⲟⲓⲁ ⲙ̅]ⲡⲟⲩⲟⲉⲓⲛ [ⲉⲥ]‐ <text:line-break/><text:span text:style-name="T1"> </text:span><text:span text:style-name="T2">(31/25) </text:span> [ϩⲏⲡ’ ϩⲛ̅ ⲁ̅ⲇ̅ⲁ̅ⲙ̅ ϫ]ⲉⲕ[ⲁⲁⲥ] ⲉⲛⲟⲩ‐ <text:line-break/><text:span text:style-name="T1"> </text:span><text:span text:style-name="T2">(31/26) </text:span> [ⲙ̅ⲙⲉ ⲛ̅ϭⲓ ⲧⲉⲡⲓⲛⲟⲓⲁ ⲛ̅ⲟⲩ]‐ <text:line-break/><text:span text:style-name="T1"> </text:span><text:span text:style-name="T2">(31/27) </text:span> [ⲥⲱϩⲉ ⲙ̅ⲡϣⲧⲁ ⲛ̅ⲧⲙⲁⲁⲩ ⲁⲩⲱ] <text:line-break/><text:span text:style-name="T1"> </text:span><text:span text:style-name="T2">(32/1) </text:span> ⲁϥⲟⲩⲱⲛϩ̅ ⲉⲃⲟⲗ ⲛ̅ϭⲓ ⲡⲣⲱⲙⲉ <text:line-break/><text:span text:style-name="T1"> </text:span><text:span text:style-name="T2">(32/2) </text:span> ⲉⲧⲃⲉ ⲑⲁⲉⲓⲃⲉⲥ ⲙ̅ⲡⲟⲩⲟⲉⲓⲛ ⲧⲁⲓ̈ <text:line-break/><text:span text:style-name="T1"> </text:span><text:span text:style-name="T2">(32/3) </text:span> ⲉⲧ’ϣⲟⲟⲡ’ ⲛ̅ϩⲣⲁⲓ̈ ⲛ̅ϩⲏⲧϥ̅· ⲁⲩⲱ <text:line-break/><text:span text:style-name="T1"> </text:span><text:span text:style-name="T2">(32/4) </text:span> ⲁⲡⲉϥⲙⲉⲉⲩⲉ ϫⲓ̣[ⲥⲉ] ⲡⲁⲣⲁ ⲛⲉⲛ̣‐ <text:line-break/><text:span text:style-name="T1"> </text:span><text:span text:style-name="T2">(32/5) </text:span> ⲧⲁⲩⲧⲁⲙⲓⲟϥ ⲧ[ⲏⲣⲟⲩ·] ⲛ̅ⲧⲉⲣⲟⲩ̣ <text:line-break/><text:span text:style-name="T1"> </text:span><text:span text:style-name="T2">(32/6) </text:span> ⲉⲓⲱⲣⲙ̅ ⲉⲧⲡ[ⲉ ⲁⲩ]ⲛ̣ⲁⲩ ⲉⲣⲟϥ <text:line-break/><text:span text:style-name="T1"> </text:span><text:span text:style-name="T2">(32/7) </text:span> ϫⲉ ϥϫⲟ̣[ⲥⲉ ⲛ̅ϭⲓ ⲡⲉϥ]ⲙ̣ⲉⲉⲩⲉ ⲁⲩⲱ̣ <text:line-break/><text:span text:style-name="T1"> </text:span><text:span text:style-name="T2">(32/8) </text:span> ⲁ̣ⲩ̣ⲓⲣ̣[ⲉ ⲛ̅ⲟⲩϣⲟϫⲛ]ⲉ ⲙⲛ̅ ⲧⲁⲣ‐ <text:line-break/><text:span text:style-name="T1"> </text:span><text:span text:style-name="T2">(32/9) </text:span> [ⲭⲟⲛⲧⲓⲕⲏ ⲙⲛ̅ ⲧⲁⲅⲅⲉⲗⲓⲕ]ⲏ̣ [ⲧⲏ]ⲣ̣ⲥ̅ <text:line-break/><text:span text:style-name="T1"> </text:span><text:span text:style-name="T2">(32/10) </text:span> (lines 10-15 are missing) <text:line-break/><text:span text:style-name="T1"> </text:span><text:span text:style-name="T2">(32/16) </text:span> [ϫⲉⲕⲁⲁⲥ ⲉⲩⲛⲁⲣ̅ⲡⲗⲁⲥⲥ]ⲉ ⲛ̣̅[ⲕⲉ] <text:line-break/><text:span text:style-name="T1"> </text:span><text:span text:style-name="T2">(32/17) </text:span> [ⲥⲟⲡ’ ⲉⲃⲟⲗ ϩⲙ̅ ⲡⲕⲁϩ ⲙ]ⲛ̅ ⲡⲙ[ⲟⲟⲩ] <text:line-break/><text:span text:style-name="T1"> </text:span><text:span text:style-name="T2">(32/18) </text:span> [ⲙⲛ̅ ⲡⲕ]ⲱ[ϩⲧ̅’ ⲁⲩⲱ ⲡⲉⲡ̅ⲛ̅ⲁ̅ ⲡⲉⲃⲟⲗ] <text:line-break/><text:span text:style-name="T1"> </text:span><text:span text:style-name="T2">(32/19) </text:span> [ϩⲛ̅ ⲑⲩ]ⲗⲏ [ⲉⲧⲉ ⲧⲁⲓ̈ ⲧⲉ ⲧⲙ̅ⲛ̅ⲧ̅’̅ⲁⲧ’]‐ <text:line-break/><text:span text:style-name="T1"> </text:span><text:span text:style-name="T2">(32/20) </text:span> [ⲥⲟⲟ]ⲩ̣ⲛ ⲙ̣̅[ⲡⲕⲁⲕⲉ· ⲁⲩⲱ ⲧⲉⲡⲓ]‐ <text:line-break/><text:span text:style-name="T1"> </text:span><text:span text:style-name="T2">(32/21) </text:span> [ⲑⲩⲙⲓ]ⲁ· [ⲁⲩⲱ ⲡⲉⲩⲡ̅ⲛ̅ⲁ̅ ⲉⲧ’ϣⲃ̅ <text:line-break/><text:span text:style-name="T1"> </text:span><text:span text:style-name="T2">(32/22) </text:span> [ⲃⲓⲟⲉⲓ]ⲧ’ ⲉⲧ[ⲉ ⲡⲁⲓ̈ ⲡⲉ ⲡⲥⲡⲏⲗⲁⲓⲟⲛ] <text:line-break/><text:span text:style-name="T1"> </text:span><text:span text:style-name="T2">(32/23) </text:span> [ⲛ̅ⲧ]ⲁ̣ⲛ̣[ⲁⲡⲗⲁⲥⲓⲥ ⲙ̅ⲡⲥⲱⲙⲁ ⲡⲁⲓ̈] <text:line-break/><text:span text:style-name="T1"> </text:span><text:span text:style-name="T2">(32/24) </text:span> [ⲉⲛ]ⲧⲁⲩⲧⲁ̣ⲁ̣[ϥ {ϩ̅ⲓ} ⲡⲣⲱⲙⲉ ⲛ̅ϭⲓ ⲛ̅ⲗⲏ]‐ <text:line-break/><text:span text:style-name="T1"> </text:span><text:span text:style-name="T2">(32/25) </text:span> ⲥⲧⲏⲥ ⲧⲙⲣ̅ⲣ̣[ⲉ ⲛ̅ⲧⲃ̅ϣⲉ· ⲁⲩⲱ ⲡⲁⲓ̈] <text:line-break/><text:span text:style-name="T1"> </text:span><text:span text:style-name="T2">(32/26) </text:span> ⲁϥϣⲱⲡⲉ [ⲛ̅ⲟⲩⲣⲱⲙⲉ ⲉϣⲁϥ] <text:line-break/><text:span text:style-name="T1"> </text:span><text:span text:style-name="T2">(32/27) </text:span> (4 lines missing) <text:line-break/><text:span text:style-name="T1"> </text:span><text:span text:style-name="T2">(33/1) </text:span> [ⲧⲟⲩ]ⲛⲟⲥ ⲙ̅ⲡⲉϥⲙⲉⲩⲉ· ⲁⲩⲱ ⲁⲩ‐ <text:line-break/><text:span text:style-name="T1"> </text:span><text:span text:style-name="T2">(33/2) </text:span> [ⲉⲓⲛⲉ ⲙ̅ⲙⲟϥ ⲛ̅ϭⲓ ⲛ̅ⲁⲣⲭⲱⲛ ⲁⲩⲕⲱ <text:line-break/><text:span text:style-name="T1"> </text:span><text:span text:style-name="T2">(33/3) </text:span> [ⲙ̅ⲙⲟ]ϥ̣ ⲛ̅ϩⲣ[ⲁ]ⲓ̈ ϩⲙ̣̅ ⲡ̣ⲁⲣⲁⲇⲉⲓⲥⲟⲥ ⲁⲩ̣ⲱ̣ <text:line-break/><text:span text:style-name="T1"> </text:span><text:span text:style-name="T2">(33/4) </text:span> [ⲡⲉϫⲁⲩ ⲛⲁϥ ϫⲉ] ⲟ̣ⲩⲱⲙ ⲉⲧⲉ ⲡⲁⲓ̈ ⲡⲉ <text:line-break/><text:span text:style-name="T1"> </text:span><text:span text:style-name="T2">(33/5) </text:span> [ϩⲛ̅ ⲟⲩⲥⲣ̅ⲃⲉ ⲕⲁⲓ̈ ⲅ]ⲁ̣ⲣ̣ ⲧ̣ⲟⲩⲧⲣⲩⲫⲏ <text:line-break/><text:span text:style-name="T1"> </text:span><text:span text:style-name="T2">(33/6) </text:span> [ⲥⲁϣⲉ ⲁⲩⲱ ⲡⲟⲩⲥⲁ ⲟⲩ]ⲁⲛⲟⲙⲟⲛ ⲡⲉ̣ <text:line-break/><text:soft-page-break/><text:span text:style-name="T1"> </text:span><text:span text:style-name="T2">(33/7) </text:span> [ⲧⲟⲩⲧⲣⲩⲫⲏ ⲇⲉ ⲧⲉ ⲧⲁⲡ]ⲁⲧⲏ ⲁⲩⲱ <text:line-break/><text:span text:style-name="T1"> </text:span><text:span text:style-name="T2">(33/8) </text:span> [ⲛⲟⲩϣⲏⲛ ⲧⲉ ⲧⲙ̅ⲛ̅ⲧ̅’̅ⲁⲥⲉⲃⲏⲥ {{ⲁⲩⲱ] <text:line-break/><text:span text:style-name="T1"> </text:span><text:span text:style-name="T2">(33/9) </text:span> [ⲡⲟⲩⲥⲁ ⲟⲩⲁⲛⲟⲙⲟⲛ ⲡⲉ ⲧⲟⲩⲧⲣⲩ]‐ <text:line-break/><text:span text:style-name="T1"> </text:span><text:span text:style-name="T2">(33/10) </text:span> [ⲫⲏ ⲇⲉ ⲧⲉ ⲧⲁⲡⲁⲧⲏ ⲁⲩⲱ ⲛⲟⲩϣⲏⲛ] <text:line-break/><text:span text:style-name="T1"> </text:span><text:span text:style-name="T2">(33/11) </text:span> [ⲧⲉ ⲧⲙ̅ⲛ̅ⲧ̅’̅ⲁⲥⲉⲃⲏⲥ}} ⲁⲩⲱ ⲡⲟⲩ]‐ <text:line-break/><text:span text:style-name="T1"> </text:span><text:span text:style-name="T2">(33/12) </text:span> [ⲕⲁⲣⲡⲟⲥ ⲟⲩⲙⲁⲧⲟⲩ] ⲛ̣̅ⲁ̣[ⲧ’ⲧⲁⲗ]‐ <text:line-break/><text:span text:style-name="T1"> </text:span><text:span text:style-name="T2">(33/13) </text:span> [ϭⲟ ⲡⲉ·ⲁⲩⲱ ⲡⲟⲩϣ]ⲡ̣ⲱⲡ’̣ ⲟⲩ̣‐ <text:line-break/><text:span text:style-name="T1"> </text:span><text:span text:style-name="T2">(33/14) </text:span> [ⲙⲟⲩ ⲡⲉ ⲡϣⲏⲛ ⲇ]ⲉ̣ ⲛ̣̅ⲧⲉ̣ ⲡ̣ⲟⲩ‐ <text:line-break/><text:span text:style-name="T1"> </text:span><text:span text:style-name="T2">(33/15) </text:span> [ⲱⲛϩ̅ ⲛ̅ⲧⲁⲩⲕⲱ ⲙ̅ⲙⲟ]ϥ̣ ϩ̣ⲛ̣̅ ⲧ̣ⲙⲏ‐ <text:line-break/><text:span text:style-name="T1"> </text:span><text:span text:style-name="T2">(33/16) </text:span> [ⲧⲉ ⲙ̅ⲡⲁⲣⲁⲇⲉⲓⲥⲟⲥ ⲁⲛⲟ]ⲕ [ⲇⲉ] ϯ‐ <text:line-break/><text:span text:style-name="T1"> </text:span><text:span text:style-name="T2">(33/17) </text:span> [ⲛⲁⲧⲥⲁⲃⲱⲧⲛ̅ ϫⲉ ⲟⲩ ⲡⲉ ⲡ]ⲙ̣ⲩ‐ <text:line-break/><text:span text:style-name="T1"> </text:span><text:span text:style-name="T2">(33/18) </text:span> [ⲥⲧⲏⲣⲓⲟⲛ ⲛ̅ⲧⲉ ⲡⲟⲩⲱⲛϩ̅ ⲉ]ⲧⲉ <text:line-break/><text:span text:style-name="T1"> </text:span><text:span text:style-name="T2">(33/19) </text:span> [ⲡⲁⲓ̈ ⲡⲉ ⲡϣⲟϫⲛⲉ] ⲛ̣̅ⲧ̣ⲁ[ⲩ]ⲁ̣ⲁ̣ϥ <text:line-break/><text:span text:style-name="T1"> </text:span><text:span text:style-name="T2">(33/20) </text:span> [ⲙⲛ̅ ⲛⲟⲩⲉⲣⲏⲟⲩ ⲉⲧ]ⲉ ⲡ[ⲁⲓ̈] ⲡ̣ⲉ <text:line-break/><text:span text:style-name="T1"> </text:span><text:span text:style-name="T2">(33/21) </text:span> [ⲡⲓⲛⲉ ⲙ̅ⲡⲟⲩⲡ̅ⲛ̅ⲁ̅] ⲡ̣ⲁⲓ̈ ⲉ̣[ⲧ]ⲉ̣ⲣ̣ⲉ <text:line-break/><text:span text:style-name="T1"> </text:span><text:span text:style-name="T2">(33/22) </text:span> [ⲧⲉϥⲛⲟⲩⲛⲉ ⲥ]ⲁϣⲉ ⲁ̣ⲩ̣ⲱ ⲛⲉϥ‐ <text:line-break/><text:span text:style-name="T1"> </text:span><text:span text:style-name="T2">(33/23) </text:span> [ⲕⲗⲁⲇⲟⲥ ϩ]ⲉⲛⲙⲟⲩ ⲛ̣ⲉ· ⲧⲉϥ‐ <text:line-break/><text:span text:style-name="T1"> </text:span><text:span text:style-name="T2">(33/24) </text:span> [ϩⲟⲉⲓⲃⲉⲥ ⲟ]ⲩⲙⲟⲥⲧⲉ ⲧⲉ· ⲁⲩⲱ <text:line-break/><text:span text:style-name="T1"> </text:span><text:span text:style-name="T2">(33/25) </text:span> [ⲟⲩⲁⲡⲁ]ⲧ̣ⲏ ⲧⲉⲧ’ϣⲟⲟⲡ’ ϩⲛ̅ ⲛⲉϥ‐ <text:line-break/><text:span text:style-name="T1"> </text:span><text:span text:style-name="T2">(33/26) </text:span> [ϭⲱⲃⲉ· ⲁ]ⲩ̣ⲱ ⲡⲉ[ϥⲙ]ⲏⲗⲟⲥ ⲟⲩϯ <text:line-break/><text:span text:style-name="T1"> </text:span><text:span text:style-name="T2">(33/27) </text:span> [ⲛ̅ⲧⲉ ⲡⲧⲱϩ]ⲥ̅ ⲛ̣̅[ⲧ]ⲡⲟⲛⲏⲣⲓⲁ ⲡⲉ <text:line-break/><text:span text:style-name="T1"> </text:span><text:span text:style-name="T2">(33/28) </text:span> [ⲁⲩⲱ ⲡⲉϥⲕ]ⲁ̣ⲣⲡⲟⲥ ⲡ̣ⲉ ⲡⲙⲟⲩ <text:line-break/><text:span text:style-name="T1"> </text:span><text:span text:style-name="T2">(33/29) </text:span> [ⲁⲩⲱ ⲟⲩⲉⲡⲓ]ⲑⲩ[ⲙⲓⲁ] ⲡⲉ ⲡⲉϥ‐ <text:line-break/><text:span text:style-name="T1"> </text:span><text:span text:style-name="T2">(34/1) </text:span> ⲥⲡⲉⲣⲙⲁ· ⲁⲩⲱ ⲉϥϯ ⲟⲩⲱ ⲉ̣[ⲃⲟⲗ] <text:line-break/><text:span text:style-name="T1"> </text:span><text:span text:style-name="T2">(34/2) </text:span> ϩⲙ̅ ⲡⲕⲁⲕⲉ· ⲛⲉⲧ’ϫⲓ ϯⲡⲉ [ⲉⲃⲟⲗ] <text:line-break/><text:span text:style-name="T1"> </text:span><text:span text:style-name="T2">(34/3) </text:span> ⲛ̅ϩⲏⲧϥ̅ ⲡⲉⲩⲙⲁ ⲛ̅ϣ̣ⲱⲡⲉ [ⲡⲉ ⲉⲙⲛ̅]‐ <text:line-break/><text:span text:style-name="T1"> </text:span><text:span text:style-name="T2">(34/4) </text:span> ⲧⲉ· ⲁⲩⲱ ⲡⲕⲁⲕ̣[ⲉ] ⲡ̣[ⲉ ⲡⲉⲩⲙⲁ ⲛ̅ⲙ̅]‐ <text:line-break/><text:span text:style-name="T1"> </text:span><text:span text:style-name="T2">(34/5) </text:span> ⲧⲟⲛ· ⲡⲉⲧⲁⲩⲙ[ⲟⲩⲧⲉ ⲇⲉ ⲉⲣⲟϥ ⲉⲃⲟⲗ] <text:line-break/><text:span text:style-name="T1"> </text:span><text:span text:style-name="T2">(34/6) </text:span> {ϩ̅ⲓ}ⲧⲟⲟⲧⲟⲩ ϫⲉ̣ ⲡ̣[ϣⲏⲛ ⲛ̅ⲥⲟⲟⲩⲛ] <text:line-break/><text:span text:style-name="T1"> </text:span><text:span text:style-name="T2">(34/7) </text:span> ⲡⲉⲧⲛⲁ[ⲛⲟⲩϥ ⲙⲛ̅ ⲡⲉⲧ’ϩⲟⲟⲩ ⲉⲧⲉ] <text:line-break/><text:span text:style-name="T1"> </text:span><text:span text:style-name="T2">(34/8) </text:span> ⲡⲁⲓ̈ ⲡⲉ ⲧ̣[ⲉⲡⲓⲛⲟⲓⲁ ⲙ̅ⲡⲟⲩⲟⲉⲓⲛ ⲉⲁⲩ]‐ <text:line-break/><text:span text:style-name="T1"> </text:span><text:span text:style-name="T2">(34/9) </text:span> ϭⲱ̣ ⲙ̣̅[ⲡⲉϥⲙ̅ⲧⲟ ⲉⲃⲟⲗ· ϫⲉⲕⲁⲁⲥ] <text:line-break/><text:span text:style-name="T1"> </text:span><text:span text:style-name="T2">(34/10) </text:span> (lines 10-14 are missing) <text:line-break/><text:span text:style-name="T1"> </text:span><text:span text:style-name="T2">(34/15) </text:span> ⲙ̣̅ⲫⲟϥ ⲁⲛ̣[ⲡⲉⲛⲧⲁϥⲧⲥⲁⲃⲉ ⲁⲇⲁⲙ] <text:line-break/><text:span text:style-name="T1"> </text:span><text:span text:style-name="T2">(34/16) </text:span> ⲉⲧⲣⲉϥⲟⲩ[ⲱⲙ·ⲁϥⲥⲱⲃⲉ ⲛ̅ϭⲓ ⲡⲥⲱ]‐ <text:line-break/><text:span text:style-name="T1"> </text:span><text:span text:style-name="T2">(34/17) </text:span> ⲧⲏ̣ⲣ ⲡⲉϫ[ⲁϥ ϫⲉ ⲫⲟϥ ⲁϥⲧⲥⲁⲃⲟⲟⲩ] <text:line-break/><text:span text:style-name="T1"> </text:span><text:span text:style-name="T2">(34/18) </text:span> ⲉⲟⲩ[ⲱⲙ ⲉⲃⲟⲗ ϩⲛ̅ ⲟⲩⲕⲁⲕⲓⲁ ⲛ̅]‐ <text:line-break/><text:span text:style-name="T1"> </text:span><text:span text:style-name="T2">(34/19) </text:span> ⲥ̣ⲡⲟ[ⲣⲁ ⲛ̅ⲉⲡⲓⲑⲩⲙⲓⲁ ⲛ̅ⲧⲉ ⲡⲧⲁ]‐ <text:line-break/><text:span text:style-name="T1"> </text:span><text:span text:style-name="T2">(34/20) </text:span> [ⲕⲟ ϫⲉⲕⲁⲁⲥ ⲉϥⲛⲁϣⲱⲡⲉ ⲛⲁϥ] <text:line-break/><text:span text:style-name="T1"> </text:span><text:span text:style-name="T2">(34/21) </text:span> ⲛ̅ⲟ[ⲩϣⲁⲩ· ⲁⲩⲱ ⲁϥⲙ̅ⲙⲉ ϫⲉ ϥⲟ] <text:line-break/><text:span text:style-name="T1"> </text:span><text:span text:style-name="T2">(34/22) </text:span> ⲛ̅ⲁ[ⲧ’ⲥⲱⲧⲙ̅ ⲛⲁϥ ⲉⲧⲃⲉ ⲡⲟⲩⲟⲉⲓⲛ] <text:line-break/><text:span text:style-name="T1"> </text:span><text:span text:style-name="T2">(34/23) </text:span> ⲛ̅[ⲧ]ⲉ̣ⲡⲓ̣[ⲛⲟⲓⲁ ⲉⲧ’ϣⲟⲟⲡ’ ⲛ̅ϩⲏⲧϥ̅] <text:line-break/><text:span text:style-name="T1"> </text:span><text:span text:style-name="T2">(34/24) </text:span> ⲉⲧ[ⲥ]ⲱ̣ϩⲉ [ⲙ̅ⲙⲟϥ ϩⲙ̅ ⲡⲉϥⲙⲉⲉⲩⲉ] <text:line-break/><text:span text:style-name="T1"> </text:span><text:span text:style-name="T2">(34/25) </text:span> ⲛ̅ϩⲟ̣[ⲩⲟ] ⲉⲡϣⲟⲣ̣[ⲡ̅’ ⲛ̅ⲁⲣⲭⲱⲛ·] <text:line-break/><text:span text:style-name="T1"> </text:span><text:span text:style-name="T2">(34/26) </text:span> ⲁⲩⲱ ⲁϥ̣ⲟ̣ⲩⲱϣⲉ [ⲉⲉⲓⲛⲉ ⲛ̅ⲧϭⲟⲙ] <text:line-break/><text:span text:style-name="T1"> </text:span><text:span text:style-name="T2">(34/27) </text:span> ⲉⲃⲟⲗ ⲇⲉ ⲛ̣̅ⲧⲁϥⲧⲁⲁ̣[ⲥ ⲛⲁϥ ⲉⲃⲟⲗ] <text:line-break/><text:span text:style-name="T1"> </text:span><text:span text:style-name="T2">(34/28) </text:span> {ϩ̅ⲓ}ⲧⲟⲟⲧϥ̅· ⲁⲩⲱ ⲁϥⲉⲓ[ⲛⲉ ⲛ̅ⲟⲩⲃ̅]‐ <text:line-break/><text:soft-page-break/><text:span text:style-name="T1"> </text:span><text:span text:style-name="T2">(34/29) </text:span> ϣⲉ ⲉϫⲛ̅ ⲁⲇ̣ⲁⲙ· ⲁⲩ[ⲱ ⲡⲉϫⲁⲓ̈] <text:line-break/><text:span text:style-name="T1"> </text:span><text:span text:style-name="T2">(34/30) </text:span> ⲙ̅ⲡⲥⲱⲧ[ⲏ]ⲣ̣ ϫⲉ ⲟⲩ [ⲧⲉ ⲧⲃ̅ϣⲉ] <text:line-break/><text:span text:style-name="T1"> </text:span><text:span text:style-name="T2">(34/31) </text:span> ⲛ̅ⲧⲟϥ ⲇⲉ̣ ⲡ[ⲉ]ϫ̣ⲁϥ [ϫⲉ ⲛ̅ⲑⲉ ⲁⲛ ⲛ̅]‐ <text:line-break/><text:span text:style-name="T1"> </text:span><text:span text:style-name="T2">(34/32) </text:span> ⲧⲁⲙⲱⲩ̣ⲥ̣ⲏⲥ ⲥϩⲁ̣[ⲓ̈ ⲉⲁⲕⲥⲱⲧⲙ̅] <text:line-break/><text:span text:style-name="T1"> </text:span><text:span text:style-name="T2">(35/1) </text:span> ⲁϥϫⲟⲟⲥ ⲅⲁⲣ ⲛ̅ϩⲣⲁⲓ̈ ϩⲙ̅ ⲡⲉϥϣⲟ‐ <text:line-break/><text:span text:style-name="T1"> </text:span><text:span text:style-name="T2">(35/2) </text:span> ⲣⲡ̅’ ⲛ̅ϫⲱⲙⲉ ϫⲉ ⲁϥϫⲧⲟ ⲙ̅ⲙⲟϥ <text:line-break/><text:span text:style-name="T1"> </text:span><text:span text:style-name="T2">(35/3) </text:span> ⲁⲗⲗⲁ ϩⲛ̅ ⲛⲉϥ̣ⲉⲥⲑⲏⲥⲓⲥ· ⲕⲁⲓ ⲅⲁⲣ <text:line-break/><text:span text:style-name="T1"> </text:span><text:span text:style-name="T2">(35/4) </text:span> ⲁϥϫⲟⲟⲥ ⲉⲃ̣[ⲟⲗ {ϩ̅ⲓ}]ⲧⲛ̅ ⲡⲉⲡⲣⲟⲫⲏ‐ <text:line-break/><text:span text:style-name="T1"> </text:span><text:span text:style-name="T2">(35/5) </text:span> ⲧⲏⲥ ϫⲉ ϯ[ⲛⲁϩⲣⲟ]ϣ ⲉϩⲣⲁⲓ̈ ⲉϫⲛ̅ <text:line-break/><text:span text:style-name="T1"> </text:span><text:span text:style-name="T2">(35/6) </text:span> ⲛⲉⲩϩⲏⲧ’̣ [ϫⲉⲕ]ⲁ̣ⲁⲥ̣ [ⲛ̅]ⲛⲉⲩϯ <text:line-break/><text:span text:style-name="T1"> </text:span><text:span text:style-name="T2">(35/7) </text:span> ϩⲧⲏⲩ ⲟⲩ[ⲧⲉ ⲛ̅ⲛⲉⲩⲛⲁ]ⲩ ⲉⲃⲟⲗ· <text:line-break/><text:span text:style-name="T1"> </text:span><text:span text:style-name="T2">(35/8) </text:span> ⲧ̣ⲟⲧⲉ ⲧ̣[ⲉⲡⲓⲛⲟⲓⲁ ⲙ̅ⲡⲟⲩⲟⲉ]ⲓ̣ⲛ <text:line-break/><text:span text:style-name="T1"> </text:span><text:span text:style-name="T2">(35/9) </text:span> ⲁ̣[ⲥ]ϩ[ⲱⲡ’ ⲛ̅ϩⲏⲧϥ̅· ⲁⲩⲱ ⲁϥ]ⲟⲩ‐ <text:line-break/><text:span text:style-name="T1"> </text:span><text:span text:style-name="T2">(35/10) </text:span> ⲱ̣ϣ̣ⲉ̣ [ⲛ̅ϭⲓ ⲡⲣⲱⲧⲁⲣⲭⲱⲛ ⲉⲉⲓ]ⲛⲉ <text:line-break/><text:span text:style-name="T1"> </text:span><text:span text:style-name="T2">(35/11) </text:span> (lines 11-13 are missing) <text:line-break/><text:span text:style-name="T1"> </text:span><text:span text:style-name="T2">(35/14) </text:span> ⲡ̣[ⲕⲁⲕⲉ ⲙ̅ⲡⲉϥⲧⲁϩⲟⲥ· ⲁ]ⲩⲱ ⲁϥⲉⲓⲛ̣[ⲉ] <text:line-break/><text:span text:style-name="T1"> </text:span><text:span text:style-name="T2">(35/15) </text:span> [ⲉⲃⲟⲗ ⲛ̅ⲟⲩⲙⲉⲣⲟⲥ ⲛ̅ⲧ]ⲉ̣ ⲧⲉϥ̣ϭⲟⲙ <text:line-break/><text:span text:style-name="T1"> </text:span><text:span text:style-name="T2">(35/16) </text:span> ⲉ̣[ⲃⲟⲗ] ⲛ̣̅ϩⲏ[ⲧϥ̅ ⲁⲩⲱ ⲁϥⲧⲁⲙ]ⲓ̣ⲟ ⲛ̅ⲕⲉ <text:line-break/><text:span text:style-name="T1"> </text:span><text:span text:style-name="T2">(35/17) </text:span> [ⲡⲗⲁⲥ]ⲓ̣ⲥ ϩⲛ̣̅ [ⲟⲩⲙⲟⲣⲫⲏ ⲛ̅ⲥ]{ϩ̅ⲓ}[ⲙ]ⲉ <text:line-break/><text:span text:style-name="T1"> </text:span><text:span text:style-name="T2">(35/18) </text:span> ⲕⲁ̣ⲧ̣ⲁ̣ ⲡⲓ̣[ⲛⲉ ⲛ̅ⲧⲉⲡⲓⲛⲟⲓⲁ ⲉⲧⲁϩ]‐ <text:line-break/><text:span text:style-name="T1"> </text:span><text:span text:style-name="T2">(35/19) </text:span> ⲟⲩⲱ̣[ⲛϩ̅ ⲛⲁϥ ⲉⲃⲟⲗ· ⲁⲩⲱ ⲁϥⲉⲓ]ⲛⲉ <text:line-break/><text:span text:style-name="T1"> </text:span><text:span text:style-name="T2">(35/20) </text:span> ⲙ̅ⲡⲙⲉ̣[ⲣⲟⲥ ⲉⲛⲧⲁϥϫⲓⲧϥ̅ ⲉⲃⲟ]ⲗ <text:line-break/><text:span text:style-name="T1"> </text:span><text:span text:style-name="T2">(35/21) </text:span> ϩⲛ̅ ⲧϭ̣[ⲟⲙ ⲙ̅ⲡⲣⲱⲙⲉ ⲛ̅ϩⲣⲁⲓ̈ ϩ]ⲙ̅ <text:line-break/><text:span text:style-name="T1"> </text:span><text:span text:style-name="T2">(35/22) </text:span> ⲡⲗ̣ⲁ̣[ⲥⲙⲁ ⲛ̅ⲧⲙ̅ⲛ̅ⲧ̅’̅ⲥ{ϩⲓ}ⲙⲉ] ⲁ̣ⲩⲱ <text:line-break/><text:span text:style-name="T1"> </text:span><text:span text:style-name="T2">(35/23) </text:span> ⲕ̣ⲁ̣ⲧ̣[ⲁ ⲑⲉ ⲁⲛ ⲉⲛⲧⲁϥϫⲟⲟⲥ] ⲛ̣̅ϭⲓ <text:line-break/><text:span text:style-name="T1"> </text:span><text:span text:style-name="T2">(35/24) </text:span> ⲙⲱⲩ̣[ⲥⲏⲥ ϫⲉ ⲧⲉϥⲃⲏ]ⲧ̣ⲥⲡⲓⲣ· <text:line-break/><text:span text:style-name="T1"> </text:span><text:span text:style-name="T2">(35/25) </text:span> ⲁⲩⲱ ⲁ[ϥⲛⲁⲩ ⲉⲧⲥ{ϩ̅ⲓ}]ⲙⲉ ϩⲁⲧⲏϥ <text:line-break/><text:span text:style-name="T1"> </text:span><text:span text:style-name="T2">(35/26) </text:span> [ϩ]ⲛ̣̅ ⲧⲉ[ⲩⲛⲟⲩ ⲇⲉ ⲉⲧⲙ̅]ⲙⲁⲩ ⲁⲥ‐ <text:line-break/><text:span text:style-name="T1"> </text:span><text:span text:style-name="T2">(35/27) </text:span> [ⲟ]ⲩ̣ⲱ[ⲛϩ̅ ⲉⲃⲟⲗ ⲛ̅ϭⲓ ⲧ]ⲉⲡⲓⲛⲟⲓⲁ <text:line-break/><text:span text:style-name="T1"> </text:span><text:span text:style-name="T2">(35/28) </text:span> [ⲛ̅]ⲟⲩⲟⲉ̣[ⲓⲛ· ⲉⲁⲥϭⲱⲗ]ⲡ̅’ ⲉⲃⲟⲗ <text:line-break/><text:span text:style-name="T1"> </text:span><text:span text:style-name="T2">(35/29) </text:span> ϩⲙ̅ ⲡⲕⲁ[ⲗⲩⲙⲙⲁ ⲉⲧⲛ̅]ϩⲣⲁⲓ̈ {ϩ̅ⲓ}ϫⲛ̅ <text:line-break/><text:span text:style-name="T1"> </text:span><text:span text:style-name="T2">(35/30) </text:span> ⲡⲉϥ̣ϩⲏ̣ⲧ’ [ⲁⲩⲱ ⲁϥⲣ̅ⲛ]ⲏⲫⲉ <text:line-break/><text:span text:style-name="T1"> </text:span><text:span text:style-name="T2">(35/31) </text:span> ⲉⲃⲟⲗ [ϩⲙ̅ ⲡϯϩⲉ ⲙ̅ⲡⲕ]ⲁ̣ⲕⲉ <text:line-break/><text:span text:style-name="T1"> </text:span><text:span text:style-name="T2">(36/1) </text:span> ⲁⲩⲱ ⲁϥⲥⲟⲩⲱⲛ ⲧⲉϥϣ̅ⲃ̅ⲣ̅ⲉⲓⲛⲉ <text:line-break/><text:span text:style-name="T1"> </text:span><text:span text:style-name="T2">(36/2) </text:span> ⲁⲩ̣ⲱ ⲡⲉϫⲁϥ ϫⲉ ⲡⲁⲓ̈ ⲧⲉⲛⲟⲩ ⲟⲩ‐ <text:line-break/><text:span text:style-name="T1"> </text:span><text:span text:style-name="T2">(36/3) </text:span> ⲕⲁⲥ ⲡⲉ ⲉⲃⲟⲗ ϩⲛ̅ ⲛⲁⲕⲁⲥ ⲁⲩⲱ ⲟⲩ‐ <text:line-break/><text:span text:style-name="T1"> </text:span><text:span text:style-name="T2">(36/4) </text:span> ⲥⲁⲣⲝ̅ ⲉⲃⲟⲗ ϩⲛ̅ ⲧⲁⲥ̣[ⲁⲣⲝ̅]· ⲉⲧⲃⲉ ⲡⲁⲓ̈ <text:line-break/><text:span text:style-name="T1"> </text:span><text:span text:style-name="T2">(36/5) </text:span> ⲡⲣⲱⲙⲉ ⲛⲁⲕ[ⲱ ⲛ̅ⲥⲱ]ϥ ⲙ̅ⲡⲉϥⲉⲓ‐ <text:line-break/><text:span text:style-name="T1"> </text:span><text:span text:style-name="T2">(36/6) </text:span> ⲱⲧ’ ⲙⲛ̅ ⲧ̣ⲉϥⲙ[ⲁⲁⲩ ⲁ]ⲩⲱ ⲛϥ̅ⲧⲟ̣‐ <text:line-break/><text:span text:style-name="T1"> </text:span><text:span text:style-name="T2">(36/7) </text:span> ϭϥ̅ ⲉⲧⲉ̣[ϥⲥ{ϩ̅ⲓ}ⲙⲉ ⲁⲩ]ⲱ ⲛ̅ⲥⲉϣⲱ‐ <text:line-break/><text:span text:style-name="T1"> </text:span><text:span text:style-name="T2">(36/8) </text:span> ⲡⲉ ⲙ̅[ⲡⲉⲥⲛⲁⲩ ⲉⲩⲥⲁⲣ]ⲝ̅ [ⲛ̅]ⲟⲩⲱⲧ̣ <text:line-break/><text:span text:style-name="T1"> </text:span><text:span text:style-name="T2">(36/9) </text:span> ϫ[ⲉ ⲥⲉⲛⲁⲧⲛ̅ⲛⲟⲟⲩ ⲅⲁⲣ ⲛⲁ]ϥ̣ ⲙ̣̅‐ <text:line-break/><text:span text:style-name="T1"> </text:span><text:span text:style-name="T2">(36/10) </text:span> ⲡⲉ̣[ϥϣⲃⲣ ⲛ̅ϩⲱⲧⲣ̅ ⲁⲩⲱ ϥ]ⲛⲁⲕⲱ <text:line-break/><text:span text:style-name="T1"> </text:span><text:span text:style-name="T2">(36/11) </text:span> ⲛ̅[ⲥⲱϥ ⲙ̅ⲡⲉϥⲉⲓⲱⲧ’ ⲙⲛ̅ ⲧⲉϥⲙ]ⲁ̣ⲁ̣ⲩ̣ <text:line-break/><text:span text:style-name="T1"> </text:span><text:span text:style-name="T2">(36/12) </text:span> (lines 12-13 are missing) <text:line-break/><text:span text:style-name="T1"> </text:span><text:span text:style-name="T2">(36/14) </text:span> [ϫⲉ]ⲕⲁ̣[ⲁⲥ ⲉⲥⲛⲁⲥⲱϩⲉ ⲙ̅ⲡⲉⲥ]ϣⲧ̣ⲁ̣ <text:line-break/><text:span text:style-name="T1"> </text:span><text:span text:style-name="T2">(36/15) </text:span> ⲉⲧⲃⲉ ⲡ̣[ⲁⲓ̈ ⲁⲩⲙⲟⲩⲧⲉ ⲉⲣⲟⲥ] ϫⲉ <text:line-break/><text:soft-page-break/><text:span text:style-name="T1"> </text:span><text:span text:style-name="T2">(36/16) </text:span> ⲍ̅ⲱ̅ⲏ̣̅̅ [ⲉⲧⲉ ⲧⲁⲓ̈ ⲧⲉ ⲧ]ⲙ̣ⲁ[ⲁⲩ ⲛ̅]‐ <text:line-break/><text:span text:style-name="T1"> </text:span><text:span text:style-name="T2">(36/17) </text:span> ⲛⲉⲧ̣[ⲟⲛϩ̅ ⲉⲃⲟⲗ {ϩ̅ⲓ}ⲧ]ⲛ̣̅ ⲧⲡⲣ̣[ⲟⲛⲟⲓ]ⲁ <text:line-break/><text:span text:style-name="T1"> </text:span><text:span text:style-name="T2">(36/18) </text:span> [ⲛ̅]ⲧⲁ̣[ⲩⲑⲉⲛⲧⲉⲓⲁ ⲛ̅ⲧ]ⲡ̣ⲉ· ⲁ̣ⲩⲱ <text:line-break/><text:span text:style-name="T1"> </text:span><text:span text:style-name="T2">(36/19) </text:span> [................]. ⲛⲁϥ <text:line-break/><text:span text:style-name="T1"> </text:span><text:span text:style-name="T2">(36/20) </text:span> ⲉ[......ⲉⲃⲟⲗ {ϩ̅ⲓ}ⲧⲟ]ⲟ̣ⲧⲥ̅ ⲁⲩ‐ <text:line-break/><text:span text:style-name="T1"> </text:span><text:span text:style-name="T2">(36/21) </text:span> ϫ̣[ⲓ ϯⲡⲉ ⲛ̅ⲧⲅⲛⲱⲥⲓⲥ ⲛ̅ⲧ]ⲉ̣ⲗⲓⲟⲥ· <text:line-break/><text:span text:style-name="T1"> </text:span><text:span text:style-name="T2">(36/22) </text:span> ⲁ[ⲓ̈ⲟⲩⲱⲛϩ̅ ⲁⲛⲟⲕ ⲉⲃⲟⲗ ⲙ̅ⲡ]ⲥⲙⲟⲧ <text:line-break/><text:span text:style-name="T1"> </text:span><text:span text:style-name="T2">(36/23) </text:span> ⲛ̅[ⲟⲩⲁⲉⲧⲟⲥ {ϩ̅ⲓ}ϫⲙ̅ ⲡϣ]ⲏⲛ ⲙ̅‐ <text:line-break/><text:span text:style-name="T1"> </text:span><text:span text:style-name="T2">(36/24) </text:span> ⲡⲥⲟⲟ̣[ⲩⲛ ⲉⲧⲉ ⲧⲁⲓ̈ ⲧⲉ ⲧ]ⲉⲡⲓ‐ <text:line-break/><text:span text:style-name="T1"> </text:span><text:span text:style-name="T2">(36/25) </text:span> ⲛⲟⲓⲁ ⲉⲃ[ⲟⲗ ϩⲛ̅ ⲧⲉⲡⲣⲟ]ⲛⲟⲓⲁ ⲛ̅‐ <text:line-break/><text:span text:style-name="T1"> </text:span><text:span text:style-name="T2">(36/26) </text:span> ⲟⲩⲟⲉⲓⲛ̣ [ⲉⲧ’ⲧⲃ̅ⲃⲏⲟⲩ ϫ]ⲉⲕⲁ[ⲁⲥ] <text:line-break/><text:span text:style-name="T1"> </text:span><text:span text:style-name="T2">(36/27) </text:span> ⲉⲓ̈ⲛⲁⲧⲥ̣[ⲁⲃⲟⲟⲩ ⲁⲩⲱ] ⲛ̣̅ⲧⲁⲧⲟ̣[ⲩ]‐ <text:line-break/><text:span text:style-name="T1"> </text:span><text:span text:style-name="T2">(36/28) </text:span> ⲛⲟⲥⲟ[ⲩ ⲉⲃⲟⲗ ϩⲙ̅ ⲡ]ϣⲓ̣ⲕ ⲙ̅ⲫⲓ‐ <text:line-break/><text:span text:style-name="T1"> </text:span><text:span text:style-name="T2">(36/29) </text:span> ⲛⲏⲃ· [ⲛⲉⲩϣⲟⲟⲡ’ ⲅ]ⲁⲣ ⲙ̅ⲡⲥⲛⲁⲩ <text:line-break/><text:span text:style-name="T1"> </text:span><text:span text:style-name="T2">(36/30) </text:span> ⲛ̅ⲟⲩϩ̣[ⲉ ⲁⲩⲱ ⲁⲩⲙ̅ⲙⲉ ⲉ]ⲡⲟⲩ‐ <text:line-break/><text:span text:style-name="T1"> </text:span><text:span text:style-name="T2">(37/1) </text:span> ⲕⲱⲕ ⲁϩⲏⲟⲩ ⲁⲥⲟⲩⲱⲛϩ̅ ⲛⲁⲩ <text:line-break/><text:span text:style-name="T1"> </text:span><text:span text:style-name="T2">(37/2) </text:span> ⲉⲃⲟⲗ ⲛ̅ϭⲓ ⲧⲉⲡⲓⲛⲟⲓⲁ ⲉⲥⲉ ⲛ̅ⲟⲩⲟ‐ <text:line-break/><text:span text:style-name="T1"> </text:span><text:span text:style-name="T2">(37/3) </text:span> ⲉⲓⲛ ⲉⲥⲧⲟⲩ[ⲛ]ⲟⲥ ⲙ̅ⲡⲟⲩⲙⲉⲉⲩⲉ <text:line-break/><text:span text:style-name="T1"> </text:span><text:span text:style-name="T2">(37/4) </text:span> ⲉϩⲣⲁⲓ̈· [ⲛ̅]ⲧ̣ⲁ̣ⲣⲉϥⲉⲓⲙⲉ ⲇⲉ ⲛ̅ϭⲓ <text:line-break/><text:span text:style-name="T1"> </text:span><text:span text:style-name="T2">(37/5) </text:span> ⲓ̅̈̅ⲁ̅ⲗ̅ⲧ̅ⲁ̅ⲃ̅ⲁ̅[̅ⲱ̅ⲑ̅ ϫⲉ] ⲁⲩⲥⲁ̣[ϩ]ⲱⲟⲩ ⲉⲃⲟⲗ <text:line-break/><text:span text:style-name="T1"> </text:span><text:span text:style-name="T2">(37/6) </text:span> ⲙ̅ⲙⲟϥ ⲁ[ϥⲥⲟ]ⲩ̣ⲱⲣ̣ [ⲙ̅]ⲡ̣ⲉϥⲕⲁϩ <text:line-break/><text:span text:style-name="T1"> </text:span><text:span text:style-name="T2">(37/7) </text:span> ⲁϥϭⲛ̅ ⲧⲥ̣[{ϩ̅ⲓ}ⲙⲉ ⲉⲥⲥⲟⲃⲧⲉ] ⲙ̅ⲙⲟⲥ <text:line-break/><text:span text:style-name="T1"> </text:span><text:span text:style-name="T2">(37/8) </text:span> ⲙ̅ⲡⲉ̣[ⲥϩⲟⲟⲩⲧ’·ⲛⲉϥⲟ ⲛ̅ϫⲟⲉⲓ]ⲥ ⲉⲣⲟⲥ <text:line-break/><text:span text:style-name="T1"> </text:span><text:span text:style-name="T2">(37/9) </text:span> ⲡⲉ ⲉϥ̣[ⲥⲟⲟⲩⲛ ⲁⲛ ⲙ̅ⲡⲙⲩⲥ]ⲧⲏⲣⲓ‐ <text:line-break/><text:span text:style-name="T1"> </text:span><text:span text:style-name="T2">(37/10) </text:span> ⲟⲛ ⲉ[ⲛⲧⲁϩϣⲱⲡⲉ ⲉⲃⲟⲗ ϩⲙ̅ ⲡ]ϣⲟ‐ <text:line-break/><text:span text:style-name="T1"> </text:span><text:span text:style-name="T2">(37/11) </text:span> ϫ̣[ⲛ]ⲉ̣ [ⲉⲧⲟⲩⲁⲁⲃ· ⲛ̅ⲧⲟⲟⲩ ⲇⲉ ⲁ]ⲩ̣ⲣ̅‐ <text:line-break/><text:span text:style-name="T1"> </text:span><text:span text:style-name="T2">(37/12) </text:span> ϩ̣ⲟ̣[ⲧⲉ ⲉϫⲡⲓⲟϥ· ⲁⲩⲱ ⲁϥⲟⲩⲱⲛϩ̅] ⲉⲃ̣[ⲟⲗ] <text:line-break/><text:span text:style-name="T1"> </text:span><text:span text:style-name="T2">(37/13) </text:span> [ⲛ̅ⲛⲉϥⲁⲅⲅⲉⲗⲟⲥ ⲛ̅ⲧⲉϥⲙ̅ⲛ̅ⲧ̅’̅ⲁⲧ’]‐ <text:line-break/><text:span text:style-name="T1"> </text:span><text:span text:style-name="T2">(37/14) </text:span> [ⲥⲟⲟⲩⲛ ⲧⲉⲧϣⲟⲟⲡ ⲛ̅ϩⲣ]ⲁⲓ̈ ⲛ̅ϩⲏⲧϥ̅· <text:line-break/><text:span text:style-name="T1"> </text:span><text:span text:style-name="T2">(37/15) </text:span> [ⲁⲩⲱ ⲁϥⲛⲟϫⲟⲩ ⲉⲃⲟⲗ ϩⲙ̅]ⲡ’ⲡⲁⲣⲁ‐ <text:line-break/><text:span text:style-name="T1"> </text:span><text:span text:style-name="T2">(37/16) </text:span> ⲇ̣[ⲉⲓⲥⲟ]ⲥ· [ⲁⲩⲱ ⲁϥϯ {ϩ̅ⲓ}ⲱⲟ]ⲩ̣ ⲛ̅ⲟ̣ⲩ‐ <text:line-break/><text:span text:style-name="T1"> </text:span><text:span text:style-name="T2">(37/17) </text:span> ⲕ̣ⲙ̣ⲏⲙⲉ ⲛ̅[ⲕⲁⲕⲉ·] ⲁ̣[ⲩⲱ ⲁϥ]ⲛ̣ⲁ̣[ⲩ] <text:line-break/><text:span text:style-name="T1"> </text:span><text:span text:style-name="T2">(37/18) </text:span> ⲛ̅ϭⲓ ⲡ[ⲣⲱⲧⲁⲣⲭ]ⲱ̣ⲛ [ⲉⲧⲡⲁⲣⲑⲉ]ⲛⲟⲥ <text:line-break/><text:span text:style-name="T1"> </text:span><text:span text:style-name="T2">(37/19) </text:span> ⲉⲧⲁ[ϩⲉⲣⲁⲧⲥ̅ ⲙⲛ̅] ⲁ̣ⲇ̣[ⲁⲙ ⲁⲩⲱ ϫ]ⲉ <text:line-break/><text:span text:style-name="T1"> </text:span><text:span text:style-name="T2">(37/20) </text:span> ⲁⲥⲟⲩ̣[ⲱⲛϩ̅ ⲉⲃⲟⲗ ⲛ̅ϩⲏⲧⲥ̅ ⲛ̅ϭⲓ ⲧ]ⲉ‐ <text:line-break/><text:span text:style-name="T1"> </text:span><text:span text:style-name="T2">(37/21) </text:span> ⲡⲓⲛ[ⲟⲓⲁ ⲛ̅]ⲟ̣ⲩ̣[ⲟⲉⲓ]ⲛ̣ [ⲛ̅ⲱⲛϩ̅ ⲁⲩ]ⲱ <text:line-break/><text:span text:style-name="T1"> </text:span><text:span text:style-name="T2">(37/22) </text:span> ⲁϥⲙ̣[ⲟⲩϩ ⲛ̅ϭ]ⲓ̣ ⲓ̣̅̅̈̅ⲁ̣̅̅ⲗ̣̅̅[̅ⲧ̅ⲁ̅ⲃ̅ⲁ̅ⲱ̅ⲑ̅] ⲛ̣̅‐ <text:line-break/><text:span text:style-name="T1"> </text:span><text:span text:style-name="T2">(37/23) </text:span> ⲟⲩⲙ̅ⲛ̣̅̅[̅ⲧ̅’̅ⲁⲧ’]ⲥ̣ⲟ̣ⲟ̣[ⲩⲛ ⲛ̅]ⲧ̣ⲁⲣⲉⲥ‐ <text:line-break/><text:span text:style-name="T1"> </text:span><text:span text:style-name="T2">(37/24) </text:span> ⲉⲓⲙⲉ ⲇ̣[ⲉ ⲛ̅ϭⲓ ⲧⲡⲣⲟⲛ]ⲟ̣ⲓⲁ ⲙ̅‐ <text:line-break/><text:span text:style-name="T1"> </text:span><text:span text:style-name="T2">(37/25) </text:span> ⲡⲧⲏⲣ[ϥ̅ ⲁⲥϫ]ⲟ̣ⲟⲩ ⲛ̣̅ϩ[ⲟ]ⲉⲓⲛⲉ <text:line-break/><text:span text:style-name="T1"> </text:span><text:span text:style-name="T2">(37/26) </text:span> ⲁⲩⲧⲱ[ⲣⲡ̅’ ⲛ]ⲍ̣ⲱ̣ⲏ ⲉ[ⲃ]ⲟⲗ ϩⲛ̅ ⲉⲩϩⲁ <text:line-break/><text:span text:style-name="T1"> </text:span><text:span text:style-name="T2">(37/27) </text:span> ⲁⲩⲱ ⲁϥ̣[ϫⲱϩⲙⲉ ⲙ̅ⲙⲟ]ⲥ̣ ⲛ̅ϭⲓ <text:line-break/><text:span text:style-name="T1"> </text:span><text:span text:style-name="T2">(37/28) </text:span> ⲡⲣⲱⲧⲁⲣ[ⲭⲱⲛ] [ⲁⲩⲱ ⲁϥ]ϫⲡⲟ ⲉ‐ <text:line-break/><text:span text:style-name="T1"> </text:span><text:span text:style-name="T2">(37/29) </text:span> ⲃⲟⲗ ⲛ̅ϩ̣[ⲏⲧⲥ̅ ⲛ̅]ϣⲏⲣⲉ̣ [ⲥⲛ]ⲁⲩ· <text:line-break/><text:span text:style-name="T1"> </text:span><text:span text:style-name="T2">(37/30) </text:span> ⲡϣⲟ[ⲣⲡ̅’ ⲁⲩ]ⲱ ⲡⲙ̣[ⲉϩⲥ]ⲛⲁⲩ <text:line-break/><text:span text:style-name="T1"> </text:span><text:span text:style-name="T2">(38/1) </text:span> ⲉ̅ⲗ̅ⲱ̅ⲓ̅̈̅ⲙ̅ ⲙ̅ⲛ̅ ⲓ̅̈ⲁⲩⲉ̅· ⲉ̅ⲗⲱⲓ̈ⲙ̅ ⲙⲉⲛ <text:line-break/><text:span text:style-name="T1"> </text:span><text:span text:style-name="T2">(38/2) </text:span> ⲟⲩϩⲟ ⲛ̅ⲁⲣⲕⲟⲥ ⲡⲉ· ⲓ̅̈̅ⲁ̅ⲩ̅ⲉ̅ ⲇⲉ ⲟⲩϩⲟ ⲛ̅‐ <text:line-break/><text:soft-page-break/><text:span text:style-name="T1"> </text:span><text:span text:style-name="T2">(38/3) </text:span> ⲉⲙⲟⲩ ⲡⲉ· ⲡⲟⲩⲁ ⲙⲉⲛ ⲟⲩⲇⲓⲕⲁⲓⲟⲥ <text:line-break/><text:span text:style-name="T1"> </text:span><text:span text:style-name="T2">(38/4) </text:span> ⲡⲉ· ⲡⲟ̣ⲩⲁ ⲇⲉ ⲟⲩⲁⲇ̣[ⲓⲕ]ⲟⲥ ⲡⲉ· ⲓ̅̈̅ⲁ̅ⲩ̅ⲉ̅ <text:line-break/><text:span text:style-name="T1"> </text:span><text:span text:style-name="T2">(38/5) </text:span> ⲙⲉⲛ ⲟ[ⲩ]ⲇ̣ⲓⲕⲁⲓⲟⲥ̣ ⲡⲉ̣[· ⲉ̅]̅ⲗ̅ⲱ̅ⲓ̅̈̅ⲙ̅ ⲇⲉ ⲟⲩ‐ <text:line-break/><text:span text:style-name="T1"> </text:span><text:span text:style-name="T2">(38/6) </text:span> ⲁⲇⲓⲕⲟⲥ̣ [ⲡ]ⲉ· ⲓ̅̈̅ⲁ̅[̅ⲩ̅ⲉ̅ ⲙⲉⲛ] ⲁϥⲣ̅ⲁⲡⲟⲕⲁ‐ <text:line-break/><text:span text:style-name="T1"> </text:span><text:span text:style-name="T2">(38/7) </text:span> ⲑⲓⲥⲧⲁ ⲙ̅[ⲙⲟ]ϥ ⲉϩⲣ̣[ⲁⲓ̈ ⲉϫⲙ̅] ⲡⲕⲱϩⲧ̅’ ⲙⲛ̅ <text:line-break/><text:span text:style-name="T1"> </text:span><text:span text:style-name="T2">(38/8) </text:span> ⲡⲧⲏⲩ [ⲉ̅ⲗ̅ⲱ̅ⲓ̅̈̅ⲙ̅ ⲇⲉ ⲁϥⲣ̅]ⲁ̣ⲡ̣ⲟⲕⲁⲑⲓ‐ <text:line-break/><text:span text:style-name="T1"> </text:span><text:span text:style-name="T2">(38/9) </text:span> ⲥⲧⲁ [ⲙ̅ⲙⲟϥ ⲉϩⲣⲁⲓ̈ ⲉϫⲙ̅ ⲡⲙⲟⲟ]ⲩ ⲙⲛ̅ <text:line-break/><text:span text:style-name="T1"> </text:span><text:span text:style-name="T2">(38/10) </text:span> ⲡⲕⲁ[ϩ· ⲛⲁⲓ̈ ⲇⲉ ⲁϥⲙⲟⲩⲧⲉ ⲉ]ⲣⲟⲟⲩ <text:line-break/><text:span text:style-name="T1"> </text:span><text:span text:style-name="T2">(38/11) </text:span> {{ϫⲉ̣ [ⲛⲁⲓ̈ ⲇⲉ ⲁϥⲙⲟⲩⲧⲉ ⲉⲣⲟ]ⲟⲩ}} ⲛ̅‐ <text:line-break/><text:span text:style-name="T1"> </text:span><text:span text:style-name="T2">(38/12) </text:span> ⲛⲓⲣ̣[ⲁⲛ ϫⲉ ⲕ̅ⲁ̅ⲓ̅̈̅ⲛ̅ ⲁⲩⲱ ⲁ̅ⲃⲉⲗ̅ ⲉϥⲛ]ⲁⲩ <text:line-break/><text:span text:style-name="T1"> </text:span><text:span text:style-name="T2">(38/13) </text:span> ⲉⲧ̣[ⲉϥⲡⲁⲛⲟⲩⲣⲅⲓⲁ ϣⲁϩⲟⲩⲛ] ϭⲉ <text:line-break/><text:span text:style-name="T1"> </text:span><text:span text:style-name="T2">(38/14) </text:span> [ⲉⲡⲟⲟⲩ ⲛ̅ϩⲟⲟⲩ ⲁⲥϭⲱ ⲛ̅ϭⲓ ⲧⲥⲩⲛ]‐ <text:line-break/><text:span text:style-name="T1"> </text:span><text:span text:style-name="T2">(38/15) </text:span> [ⲟ]ⲩⲥⲓ̣[ⲁ ⲉⲃⲟⲗ {ϩ̅ⲓ}ⲧⲛ̅ ⲡⲣⲱⲧⲁⲣⲭⲱⲛ·] <text:line-break/><text:span text:style-name="T1"> </text:span><text:span text:style-name="T2">(38/16) </text:span> ⲁⲩⲱ ⲁϥ̣[ϫⲱ ⲛ̅ⲟⲩⲥⲡⲟⲣⲁ ⲛ̅ⲉⲡⲓⲑⲩ]‐ <text:line-break/><text:span text:style-name="T1"> </text:span><text:span text:style-name="T2">(38/17) </text:span> ⲙⲓⲁ ⲛ̅[ϩⲣⲁⲓ̈ ϩⲛ̅ ⲁⲇⲁⲙ ⲁϥ]ⲧⲟ̣[ⲩⲛⲟⲥ] <text:line-break/><text:span text:style-name="T1"> </text:span><text:span text:style-name="T2">(38/18) </text:span> ⲇⲉ ⲉⲃ̣[ⲟⲗ {ϩ̅ⲓ}ⲧⲛ̅ ⲧⲥⲩⲛ]ⲟ̣ⲩⲥ[ⲓ]ⲁ ⲙ̣̅‐ <text:line-break/><text:span text:style-name="T1"> </text:span><text:span text:style-name="T2">(38/19) </text:span> ⲡ̣[ϫ]ⲡ[ⲟ ⲙ̅ⲡⲓⲛ]ⲉ ⲛ̣̅[ⲥ]ⲱ̣ⲙⲁ· ⲁⲩⲱ <text:line-break/><text:span text:style-name="T1"> </text:span><text:span text:style-name="T2">(38/20) </text:span> [ⲁϥⲭⲱⲣⲏⲅⲉⲓ] ⲛⲁ[ⲩ ⲉⲃⲟⲗ ϩⲙ̅ ⲡ]ⲉϥⲡ̅ⲛ̅ⲁ̅ <text:line-break/><text:span text:style-name="T1"> </text:span><text:span text:style-name="T2">(38/21) </text:span> ⲉ[ⲧ’ϣⲃ̅ⲃⲓⲟ]ⲉⲓⲧ’· [ⲡⲓⲁⲣⲭⲱ]ⲛ ⲇⲉ <text:line-break/><text:span text:style-name="T1"> </text:span><text:span text:style-name="T2">(38/22) </text:span> ⲥ̣[ⲛⲁⲩ ⲁϥⲣ̅ⲁⲡⲟⲕⲁ]ⲑ̣[ⲓⲥⲧⲁ] ⲙ̣̅ⲙⲟⲟⲩ <text:line-break/><text:span text:style-name="T1"> </text:span><text:span text:style-name="T2">(38/23) </text:span> ⲉ[ϩⲣⲁⲓ̈ ⲉϫⲛ̅ ϩⲁ]ϩ ⲛ̅ⲁⲣⲭⲏ [ϩⲱⲥ]ⲧⲉ <text:line-break/><text:span text:style-name="T1"> </text:span><text:span text:style-name="T2">(38/24) </text:span> ⲉ[ⲧⲣⲉⲩⲣ̅ⲁⲣⲭⲉⲓ] ⲉϫⲛ̅ [ⲡⲉⲥⲡ]ⲏ̣ⲗⲁⲓⲟⲛ <text:line-break/><text:span text:style-name="T1"> </text:span><text:span text:style-name="T2">(38/25) </text:span> ⲛ̅[ⲧ]ⲁ̣ⲣ̣[ⲉϥⲙ̅ⲙⲉ] ⲇⲉ ⲛ̅[ϭⲓ ⲁⲇⲁ]ⲙ ⲁⲡⲓ‐ <text:line-break/><text:span text:style-name="T1"> </text:span><text:span text:style-name="T2">(38/26) </text:span> ⲛⲉ ⲛ̅ⲧⲉ̣[ϥⲡⲣⲟⲅⲛ]ⲱ̣[ⲥⲓⲥ] ⲙ̅ⲙⲓⲛ ⲙ̅‐ <text:line-break/><text:span text:style-name="T1"> </text:span><text:span text:style-name="T2">(38/27) </text:span> ⲙⲟϥ· ⲁϥϫ̣[ⲡ]ⲟ̣ ⲙ̅ⲡ̣[ⲓⲛⲉ ⲙ̅]ⲡϣⲏ‐ <text:line-break/><text:span text:style-name="T1"> </text:span><text:span text:style-name="T2">(38/28) </text:span> ⲣⲉ ⲙ̅ⲡⲣⲱ̣ⲙⲉ· ⲁ[ϥⲙⲟⲩ]ⲧ̣ⲉ ⲉⲣⲟϥ <text:line-break/><text:span text:style-name="T1"> </text:span><text:span text:style-name="T2">(38/29) </text:span> ϫⲉ ⲥ̅ⲏ̅ⲑ̅ [ⲕⲁ]ⲧ̣ⲁ̣ [ⲑⲉ ⲙ̅ⲡⲉ]ϫ̣ⲡⲟ ⲛ̅ϩⲣⲁⲓ̈ <text:line-break/><text:span text:style-name="T1"> </text:span><text:span text:style-name="T2">(38/30) </text:span> ϩⲛ̅ ⲛⲁ[ⲓ]ⲱ̣[ⲛ ϩⲟ]ⲙ̣ⲟ̣[ⲓⲱⲥ] ⲧ̣ⲕⲉⲙⲁⲁⲩ <text:line-break/><text:span text:style-name="T1"> </text:span><text:span text:style-name="T2">(38/31) </text:span> ⲁⲥⲧⲛ̅ⲛ̣[ⲟ]ⲟ̣ⲩ ⲉ̣ⲡ[ⲓⲧⲛ̅] ⲙ̣̅ⲡⲉⲥⲡ̅ⲛ̅ⲁ̅ <text:line-break/><text:span text:style-name="T1"> </text:span><text:span text:style-name="T2">(38/32) </text:span> ⲙ̅ⲡⲓⲛ[ⲉ ⲛ̅ⲧ]ⲉ̣ⲧ’ⲉⲓⲛ̣[ⲉ ⲙ̅ⲙ]ⲟⲥ <text:line-break/><text:span text:style-name="T1"> </text:span><text:span text:style-name="T2">(39/1) </text:span> ⲁⲩⲱ ⲛ̅ⲟⲩⲁⲛⲧⲓⲧⲩⲡⲟⲛ ⲛ̅ⲛⲉⲧ’ϩⲛ̅ <text:line-break/><text:span text:style-name="T1"> </text:span><text:span text:style-name="T2">(39/2) </text:span> ⲡⲗⲏⲣⲱⲙⲁ· ϫⲉ ⲥⲛⲁⲥⲟⲃⲧⲉ ⲛ̅ⲟⲩ‐ <text:line-break/><text:span text:style-name="T1"> </text:span><text:span text:style-name="T2">(39/3) </text:span> ⲙⲁ ⲛ̅ϣⲱⲡⲉ ⲛ̅ⲛⲁⲓⲱⲛ ⲉⲧⲛⲏⲟⲩ <text:line-break/><text:span text:style-name="T1"> </text:span><text:span text:style-name="T2">(39/4) </text:span> ⲉⲡⲓⲧⲛ̅· ⲁⲩ̣ⲱ ⲁϥⲧⲥⲟⲟⲩ [ⲛ̅]ⲟⲩⲙⲟⲟⲩ <text:line-break/><text:span text:style-name="T1"> </text:span><text:span text:style-name="T2">(39/5) </text:span> ⲛ̅ⲃ̅ϣⲉ ⲉ̣[ⲃⲟⲗ {ϩⲓ}]ⲧ̣ⲛ̅ ⲡⲣⲱ̣ⲧ̣ⲁⲣⲭⲱⲛ <text:line-break/><text:span text:style-name="T1"> </text:span><text:span text:style-name="T2">(39/6) </text:span> ϫⲉⲕⲁⲁⲥ [ⲛ̅ⲛⲉ]ⲩⲥⲟⲩⲱ̣ⲛ̣ⲟⲩ ϫⲉ <text:line-break/><text:span text:style-name="T1"> </text:span><text:span text:style-name="T2">(39/7) </text:span> ϩⲉⲛⲉⲃⲟ[ⲗ ⲧⲱ]ⲛ̣ ⲛⲉ· ⲁ[ⲩ]ⲱ ⲧⲁⲓ̈ ⲧⲉ <text:line-break/><text:span text:style-name="T1"> </text:span><text:span text:style-name="T2">(39/8) </text:span> ⲑⲉ ⲛ̅[ⲧⲁϥϣⲱⲡⲉ] ⲛ̣̅ϭⲓ ⲡⲉⲥⲡⲉⲣⲙⲁ <text:line-break/><text:span text:style-name="T1"> </text:span><text:span text:style-name="T2">(39/9) </text:span> ⲡⲣⲟⲥ̣ [ⲟⲩⲟⲉⲓϣ ⲉϥ]ϩⲩ̣[ⲡⲟ]ⲩ̣ⲣⲅⲉⲓ ϫⲉ‐ <text:line-break/><text:span text:style-name="T1"> </text:span><text:span text:style-name="T2">(39/10) </text:span> ⲕⲁⲁⲥ̣ [ϩⲟⲧⲁⲛ ⲉϥϣ]ⲁⲛ[{ⲉ̅ⲓ} ⲉϩⲣ]ⲁⲓ̈ ⲛ̅ϭⲓ <text:line-break/><text:span text:style-name="T1"> </text:span><text:span text:style-name="T2">(39/11) </text:span> ⲡ[ⲉⲡ̅ⲛ̅ⲁ̅ ⲉⲃⲟⲗ ϩⲓⲧ]ⲛ̅ ⲛⲁ[ⲓⲱ]ⲛ ⲉⲧⲟⲩ‐ <text:line-break/><text:span text:style-name="T1"> </text:span><text:span text:style-name="T2">(39/12) </text:span> ⲁⲁ[ⲃ ⲉϥⲛⲁⲥⲁϩⲱϥ] ⲉ̣ⲣ̣ⲁⲧ̣ϥ̅ ⲁⲩⲱ̣ <text:line-break/><text:span text:style-name="T1"> </text:span><text:span text:style-name="T2">(39/13) </text:span> [ⲛϥ̅ⲧⲗ̅ϭⲟϥ ϩⲙ̅] ⲡ̣ϣⲧⲁ· [ϫ]ⲉ̣ⲕⲁⲁⲥ <text:line-break/><text:span text:style-name="T1"> </text:span><text:span text:style-name="T2">(39/14) </text:span> ⲉ̣[ⲣⲉⲡ’ⲡⲗⲏⲣⲱ]ⲙ̣ⲁ ⲧⲏⲣϥ̅ ⲛⲁϣⲱ‐ <text:line-break/><text:span text:style-name="T1"> </text:span><text:span text:style-name="T2">(39/15) </text:span> [ⲡⲉ ⲉ]ϥ̣[ⲟⲩⲁⲁⲃ ⲁ]ⲩ̣ⲱ̣ ⲛ̣̅ⲁⲧϣⲧⲁ <text:line-break/><text:span text:style-name="T1"> </text:span><text:span text:style-name="T2">(39/16) </text:span> ⲁ[ⲩ]ⲱ̣ ⲡⲉϫ[ⲁⲓ̈ ⲁⲛⲟ]ⲕ [ⲙ̅]ⲡⲥⲱⲧⲏⲣ <text:line-break/><text:span text:style-name="T1"> </text:span><text:span text:style-name="T2">(39/17) </text:span> ϫⲉ ⲡϫⲟⲉ[ⲓⲥ ⲛ̅ⲯ]ⲩⲭⲟ̣[ⲟ]ⲩ̣ⲉ ϭⲉ ⲧⲏ‐ <text:line-break/><text:soft-page-break/><text:span text:style-name="T1"> </text:span><text:span text:style-name="T2">(39/18) </text:span> ⲣⲟⲩ [ⲥⲉⲛⲁⲟⲩϫ]ⲁⲓ̈ ⲉϩ[ⲟ]ⲩ̣ⲛ ⲉⲡⲟⲩⲟ‐ <text:line-break/><text:span text:style-name="T1"> </text:span><text:span text:style-name="T2">(39/19) </text:span> ⲉⲓⲛ ⲉ̣[ⲧ’ⲧⲃ̅ⲃⲏⲟ]ⲩ· ⲁϥⲟⲩⲱϣⲃ̅ ⲡⲉ‐ <text:line-break/><text:span text:style-name="T1"> </text:span><text:span text:style-name="T2">(39/20) </text:span> ϫⲁϥ ⲛ[ⲁⲓ̈ ϫ]ⲉ ϩ[ⲉ]ⲛ̣ⲛⲟϭ ⲛⲉ̣ [ⲛⲉ]ϩⲃⲏⲩⲉ <text:line-break/><text:span text:style-name="T1"> </text:span><text:span text:style-name="T2">(39/21) </text:span> ⲉⲛⲧ[ⲁⲩ]ⲧ̣ⲁⲗⲟ ⲉϩⲣⲁⲓ̈ ⲉ[ϫⲙ̅ ⲡⲉ]ⲕⲙⲉ‐ <text:line-break/><text:span text:style-name="T1"> </text:span><text:span text:style-name="T2">(39/22) </text:span> ⲉⲩⲉ̣[· ⲟⲩⲇ]ⲩⲥⲕⲟⲗⲟ[ⲛ ⲅⲁ]ⲣ̣ ⲡⲉ <text:line-break/><text:span text:style-name="T1"> </text:span><text:span text:style-name="T2">(39/23) </text:span> ⲉϭⲟⲗ̣[ⲡⲟⲩ ⲉ]ⲃ̣ⲟⲗ ⲛ̅ϩⲉ̣ⲛ̣ⲕⲟⲟⲩⲉ <text:line-break/><text:span text:style-name="T1"> </text:span><text:span text:style-name="T2">(39/24) </text:span> ⲉⲓⲙⲏⲧ̣[ⲓ ⲛ̅ⲛ]ⲁ̣ⲓ̣̈ ⲉⲧ’ϣⲟⲟⲡ ⲉⲃⲟⲗ <text:line-break/><text:span text:style-name="T1"> </text:span><text:span text:style-name="T2">(39/25) </text:span> ϩⲛ̅ ⲧ̣[ⲅⲉⲛⲉⲁ ⲛ̅]ⲁⲧⲕⲓⲙ· ⲛⲁⲓ̈ ⲉⲧⲉ <text:line-break/><text:span text:style-name="T1"> </text:span><text:span text:style-name="T2">(39/26) </text:span> ⲡⲉⲡ̣̅̅ⲛ̣̅̅[ⲁ̅ ⲙ̅ⲡ]ⲱ̣ⲛϩ̅ ⲛ̣[ⲁ]{ⲉⲓ} ⲉϩⲣⲁⲓ̈ ⲉϫⲱ‐ <text:line-break/><text:span text:style-name="T1"> </text:span><text:span text:style-name="T2">(39/27) </text:span> ⲟⲩ· ⲁⲩ[ⲱ ⲛϥ̅]ϣⲱⲡⲉ̣ ⲙⲛ̅ ⲧϭⲟⲙ <text:line-break/><text:span text:style-name="T1"> </text:span><text:span text:style-name="T2">(39/28) </text:span> ⲥⲉⲛⲁⲟⲩ[ϫⲁⲓ̈] ⲁ̣ⲩⲱ ⲛ̣̅[ⲥⲉ]ϣⲱⲡⲉ <text:line-break/><text:span text:style-name="T1"> </text:span><text:span text:style-name="T2">(39/29) </text:span> ⲛ̅ⲧⲉⲗ̣[ⲉⲓⲟⲥ] ⲁ̣ⲩⲱ ⲥ̣ⲉ̣[ⲛ]ⲁⲣ̅ ⲙ̅ⲡϣⲁ <text:line-break/><text:span text:style-name="T1"> </text:span><text:span text:style-name="T2">(39/30) </text:span> ⲛ̅ϩⲉⲛ[ⲙ̅ⲛ̅ⲧ]ⲛⲟϭ ⲁⲩ[ⲱ ⲥ]ⲉⲛⲁⲧⲃ̅ⲃⲟ <text:line-break/><text:span text:style-name="T1"> </text:span><text:span text:style-name="T2">(40/1) </text:span> ϩⲙ̅ ⲡⲙⲁ ⲉⲧⲙ̅ⲙⲁⲩ ⲉⲃⲟⲗ {ϩ̅ⲓ}ⲧⲛ̅ ⲕⲁ‐ <text:line-break/><text:span text:style-name="T1"> </text:span><text:span text:style-name="T2">(40/2) </text:span> ⲕⲓⲁ ⲛⲓⲙ· ⲙⲛ̅ ⲛ̅ⲣⲟⲟⲩϣ ⲛ̅ⲧⲉ ⲧⲡⲟ‐ <text:line-break/><text:span text:style-name="T1"> </text:span><text:span text:style-name="T2">(40/3) </text:span> ⲛⲏⲣⲓⲁ· ⲉⲛⲥⲉϥⲓ ⲣⲟⲟⲩϣ ϭⲉ ⲉⲗⲁⲁⲩ <text:line-break/><text:span text:style-name="T1"> </text:span><text:span text:style-name="T2">(40/4) </text:span> ⲁⲛ ⲉⲓⲙⲏⲧⲓ ⲉⲧⲙ̅ⲛ̅ⲧ̅’̅ⲁ̣ⲧ’ⲧⲁⲕⲟ ⲟⲩⲁ‐ <text:line-break/><text:span text:style-name="T1"> </text:span><text:span text:style-name="T2">(40/5) </text:span> ⲁⲥ ⲉⲩ[ⲣ̅]ⲙⲉⲗⲉⲧⲁ ⲙ̅ⲙ[ⲟ]ⲥ̣ ϫⲓⲛ ⲙ̅ⲡⲓ‐ <text:line-break/><text:span text:style-name="T1"> </text:span><text:span text:style-name="T2">(40/6) </text:span> ⲙⲁ· ⲭⲱ̣[ⲣ]ⲓⲥ ⲟⲣⲅⲏ [{ϩ̅ⲓ} ⲕⲱ]ϩ̣ {ϩⲓ} ⲫⲑⲟⲛⲟⲥ <text:line-break/><text:span text:style-name="T1"> </text:span><text:span text:style-name="T2">(40/7) </text:span> {ϩ̅ⲓ} ⲉⲡⲓⲑ̣[ⲩ]ⲙⲓⲁ· ⲁⲩ[ⲱ ⲧ]ⲙ̣̅ⲛⲧ’̅ⲁⲧⲥⲓ ⲛ̅‐ <text:line-break/><text:span text:style-name="T1"> </text:span><text:span text:style-name="T2">(40/8) </text:span> ⲧⲉ ⲡⲧⲏ[ⲣϥ̅] ⲉⲛⲥⲉ̣[ⲁⲙⲁϩ]ⲧⲉ ⲙ̅ⲙⲟⲟⲩ <text:line-break/><text:span text:style-name="T1"> </text:span><text:span text:style-name="T2">(40/9) </text:span> ⲁⲛ {ϩ̅ⲓ}ⲧⲛ̅ ⲗⲁ̣ⲁⲩ[· ⲉⲓⲙⲏⲧⲓ ⲉⲑ]ⲩⲡⲟⲥ‐ <text:line-break/><text:span text:style-name="T1"> </text:span><text:span text:style-name="T2">(40/10) </text:span> ⲧⲁⲥⲓ̣ⲥ̣ ⲟⲩⲁⲁⲥ̣ [ⲛ̅ⲧⲥⲁⲣⲝ̅ ⲧⲁⲓ̈] ⲉⲧⲟⲩ‐ <text:line-break/><text:span text:style-name="T1"> </text:span><text:span text:style-name="T2">(40/11) </text:span> ⲫⲟⲣ[ⲓ ⲙ̅ⲙⲟ]ⲥ̣ ⲉ̣[ⲩϭⲟϣⲧ̅’ ⲉⲃ]ⲟ̣ⲗ ⲛ̅ⲥⲁ <text:line-break/><text:span text:style-name="T1"> </text:span><text:span text:style-name="T2">(40/12) </text:span> ⲡⲟⲩ[ⲟⲉⲓ]ϣ̣ ⲉⲧ̣[ⲟⲩϭⲙ̅ ⲡⲉ]ⲩ̣[ϣⲓ]ⲛⲉ <text:line-break/><text:span text:style-name="T1"> </text:span><text:span text:style-name="T2">(40/13) </text:span> ⲛ̅ϩⲏⲧ̣[ϥ̅] ⲉⲃⲟⲗ ϩ̣{[̅ⲓ}ⲧⲛ̅ ⲛⲉⲧϫⲓ ⲛ]ⲁ̣ⲓ̈ ϭⲉ <text:line-break/><text:span text:style-name="T1"> </text:span><text:span text:style-name="T2">(40/14) </text:span> ⲛ̅ϯⲙⲓ̣ⲛ̣ⲉ ⲥ̣ⲉ̣[ⲟ ⲛ̅ⲁⲝⲓⲟⲥ ⲙ̅ⲡⲱⲛϩ̅ <text:line-break/><text:span text:style-name="T1"> </text:span><text:span text:style-name="T2">(40/15) </text:span> ⲛ̣̅ⲛⲁ[ⲧ’]ⲧⲁⲕⲟ ⲛ̅[ϣⲁ ⲉⲛⲉϩ ⲁⲩⲱ <text:line-break/><text:span text:style-name="T1"> </text:span><text:span text:style-name="T2">(40/16) </text:span> ⲡⲧⲱϩⲙ̣̅ ⲉⲩⲣ̅ϩ̣[ⲩⲡⲟⲙⲓⲛⲉ ϩⲁ]‐ <text:line-break/><text:span text:style-name="T1"> </text:span><text:span text:style-name="T2">(40/17) </text:span> ⲡⲧⲏⲣ̣ϥ̣̅ ⲉⲩϥⲓ [ⲉϩⲣⲁⲓ̈ ϩⲁ] ⲡ̣[ⲧⲏⲣϥ̅] <text:line-break/><text:span text:style-name="T1"> </text:span><text:span text:style-name="T2">(40/18) </text:span> ϫⲉⲕⲁ̣ⲁⲥ [ⲉⲩⲛⲁϫⲱ]ⲕ̣ ⲉⲃⲟⲗ̣ ⲙ̣̅[ⲡ]ⲁ‐ <text:line-break/><text:span text:style-name="T1"> </text:span><text:span text:style-name="T2">(40/19) </text:span> ⲑⲗⲟⲛ ⲛ̅ⲥ̣ⲉ̣ⲕⲗ[ⲏⲣⲟⲛ]ⲟ̣ⲙⲓ ⲛ̅ⲟⲩ‐ <text:line-break/><text:span text:style-name="T1"> </text:span><text:span text:style-name="T2">(40/20) </text:span> ⲱⲛϩ̅ ⲛ̅[ϣ]ⲁ ⲉⲛ̣[ⲉϩ· ⲡⲉϫ]ⲁⲓ̈ ⲛⲁϥ <text:line-break/><text:span text:style-name="T1"> </text:span><text:span text:style-name="T2">(40/21) </text:span> ϫⲉ ⲡϫⲟⲉ̣ⲓ̣ⲥ ⲙ̅ⲯ[ⲩⲭⲟⲟⲩⲉ] ⲉⲧⲉ <text:line-break/><text:span text:style-name="T1"> </text:span><text:span text:style-name="T2">(40/22) </text:span> ⲙ̅ⲡⲟⲩⲉ̣[ⲓ]ⲣ̣ⲉ ⲛ̅ⲛ̣[ⲓϩ]ⲃⲏ̣[ⲩⲉ] ⲛⲁⲓ̈ ⲉⲛ‐ <text:line-break/><text:span text:style-name="T1"> </text:span><text:span text:style-name="T2">(40/23) </text:span> ⲧⲁ[ⲧϭⲟⲙ] ⲙⲛ̅ ⲡ̅ⲛ̅ⲁ̅ ⲡⲱ[ⲛϩ̅ {ⲉⲓ}] ⲉϩⲣⲁⲓ̈ <text:line-break/><text:span text:style-name="T1"> </text:span><text:span text:style-name="T2">(40/24) </text:span> ⲉϫ̣[ⲱⲟ]ⲩ̣ ⲥⲉⲛⲁϣⲟ̣[ⲟⲛⲉ· ⲁ]ϥⲟⲩ‐ <text:line-break/><text:span text:style-name="T1"> </text:span><text:span text:style-name="T2">(40/25) </text:span> ⲱϣ̣[ⲃⲉ ⲡ]ⲉϫⲁϥ ⲛⲁⲓ̈ [ϫⲉ ⲉϥ]ϣ̣ⲁⲛ{ⲉ̅ⲓ} <text:line-break/><text:span text:style-name="T1"> </text:span><text:span text:style-name="T2">(40/26) </text:span> ⲉϩⲣⲁⲓ̈ ⲉ̣[ϫ]ⲱⲟⲩ ⲛ̅[ϭⲓ ⲡⲉ]ⲡ̣̅̅ⲛ̅ⲁ̅ <text:line-break/><text:span text:style-name="T1"> </text:span><text:span text:style-name="T2">(40/27) </text:span> ⲡⲁⲛⲧⲏ ⲡⲁⲛⲧⲱ̣[ⲥ ⲥⲉⲛ]ⲁ̣ⲟ̣ⲩϫⲁⲓ̈ <text:line-break/><text:span text:style-name="T1"> </text:span><text:span text:style-name="T2">(40/28) </text:span> ⲁⲩⲱ ⲛⲁⲓ̈ ⲥⲉ̣ⲛⲁ[ⲡⲱⲱⲛ]ⲉ̣ ⲉⲃⲟⲗ· <text:line-break/><text:span text:style-name="T1"> </text:span><text:span text:style-name="T2">(40/29) </text:span> ⲧⲇⲩⲛⲁ[ⲙ]ⲓⲥ̣ [ⲅⲁⲣ ⲛⲁ]{ⲉ̅ⲓ} ⲉϩⲣⲁⲓ̈ <text:line-break/><text:span text:style-name="T1"> </text:span><text:span text:style-name="T2">(40/30) </text:span> ⲉϫⲛ̅ ⲣⲱ̣ⲙⲉ ⲛⲓ̣[ⲙ ⲁϫ]ⲛ̅ⲧⲥ̅ ⲅⲁⲣ <text:line-break/><text:span text:style-name="T1"> </text:span><text:span text:style-name="T2">(40/31) </text:span> ⲙⲛ̅ϭ[ⲟ]ⲙ ⲛ̅[ⲧⲉⲗ]ⲁ̣ⲁⲩ <text:line-break/><text:span text:style-name="T1"> </text:span><text:span text:style-name="T2">(40/32) </text:span> ⲁϩⲉⲣⲁ̣[ⲧ]ϥ̣̅ [ⲙⲛ̅ⲛ̅]ⲥ̣ⲁ ⲧⲟⲩ‐ <text:line-break/><text:span text:style-name="T1"> </text:span><text:span text:style-name="T2">(41/1) </text:span> ϫⲡⲟⲟⲩ ⲇⲉ ⲧⲟⲧⲉ ⲉϥϣⲁⲛⲁϣⲁⲓ̈ <text:line-break/><text:span text:style-name="T1"> </text:span><text:span text:style-name="T2">(41/2) </text:span> ⲛ̅ϭⲓ ⲡ̅ⲛ̅ⲁ̅ ⲡⲱⲛϩ̅ ⲁⲩⲱ ϣⲁⲣⲉⲧϭⲟⲙ <text:line-break/><text:soft-page-break/><text:span text:style-name="T1"> </text:span><text:span text:style-name="T2">(41/3) </text:span> {ⲉ̅ⲓ} ⲛⲥ̅ϯ ⲧⲁϫⲣⲟ ⲛ̅ⲧⲯⲩⲭⲏ ⲉⲧⲙ̅‐ <text:line-break/><text:span text:style-name="T1"> </text:span><text:span text:style-name="T2">(41/4) </text:span> ⲙⲁⲩ· ⲁ̣ⲩⲱ ⲙⲁⲣⲉϣ [ⲗ]ⲁ̣ⲁⲩ ⲣ̅ <text:line-break/><text:span text:style-name="T1"> </text:span><text:span text:style-name="T2">(41/5) </text:span> ⲡⲗⲁⲛⲁ [ⲙ̅]ⲙⲟⲥ ⲛ̅ϩⲣⲁ̣[ⲓ̈ ϩ]ⲛ̅ ⲛ̅ϩⲃⲏ‐ <text:line-break/><text:span text:style-name="T1"> </text:span><text:span text:style-name="T2">(41/6) </text:span> ⲟⲩⲉ ⲛ̅ⲧ[ⲡⲟ]ⲛⲏⲣⲓⲁ· [ⲛⲁⲓ̈] ⲇⲉ ⲉⲧⲉ <text:line-break/><text:span text:style-name="T1"> </text:span><text:span text:style-name="T2">(41/7) </text:span> ⲡⲉⲡ̅ⲛ̣̅̅ⲁ̣̅̅ [ⲉⲧ’ϣ]ⲃ̣̅ⲃⲓⲟⲉⲓⲧ’ ⲛ̅ⲛⲏⲟⲩ <text:line-break/><text:span text:style-name="T1"> </text:span><text:span text:style-name="T2">(41/8) </text:span> ⲉϩⲣⲁ[ⲓ̈ ⲉϫⲱⲟⲩ] ϣ̣ⲁⲩⲥⲱ̣[ⲕ] ⲙ̅ⲙⲟ‐ <text:line-break/><text:span text:style-name="T1"> </text:span><text:span text:style-name="T2">(41/9) </text:span> ⲟⲩ ⲉ[ⲃⲟⲗ {ϩ̅ⲓ}ⲧⲟⲟⲧ]ϥ̣̅ ⲁⲩ̣[ⲱ ⲛ̅]ⲥⲉⲥⲱ‐ <text:line-break/><text:span text:style-name="T1"> </text:span><text:span text:style-name="T2">(41/10) </text:span> ⲣ[ⲙ̅· ⲁⲛⲟⲕ ⲇⲉ ⲡⲉ]ϫⲁⲓ̈ ϫ̣[ⲉ ⲡ]ϫⲟⲉⲓⲥ <text:line-break/><text:span text:style-name="T1"> </text:span><text:span text:style-name="T2">(41/11) </text:span> ⲙ̅[ⲯⲩⲭⲟⲟⲩ ϭⲉ ⲛ̅]ⲛⲁⲓ̈ ϩⲟⲧⲁⲛ ⲉⲩ‐ <text:line-break/><text:span text:style-name="T1"> </text:span><text:span text:style-name="T2">(41/12) </text:span> [ϣⲁⲛ{ⲉ̅ⲓ} ⲉⲃⲟⲗ ϩⲛ̅] ⲧ̣ⲟ̣ⲩⲥⲁⲣⲝ̅ ⲉⲩⲛⲁ‐ <text:line-break/><text:span text:style-name="T1"> </text:span><text:span text:style-name="T2">(41/13) </text:span> [ⲃⲱⲕ ⲉⲧⲱⲛ· ⲛ̅]ⲧⲟϥ ϫⲉ ⲁϥⲥⲱⲃⲉ <text:line-break/><text:span text:style-name="T1"> </text:span><text:span text:style-name="T2">(41/14) </text:span> [ⲡⲉϫⲁϥ ⲛⲁⲓ̈ ϫⲉ] ⲧⲯⲩⲭⲏ ⲉⲧⲉ ⲧϭⲟⲙ <text:line-break/><text:span text:style-name="T1"> </text:span><text:span text:style-name="T2">(41/15) </text:span> [ⲛⲁⲁϣⲁⲓ̈ ⲛ̅ϩⲏⲧⲥ̅ ⲡ]ⲁ̣ⲣⲁ ⲡⲓⲡ̅ⲛ̅ⲁ̅ ⲉⲧ’‐ <text:line-break/><text:span text:style-name="T1"> </text:span><text:span text:style-name="T2">(41/16) </text:span> ϣ̣[ⲏⲥ ⲧⲁⲓ̈ ⲅⲁⲣ ⲥ]ϫⲟ̣ⲟ̣ⲣ ⲁⲩⲱ ϣⲁⲥ‐ <text:line-break/><text:span text:style-name="T1"> </text:span><text:span text:style-name="T2">(41/17) </text:span> ⲡ[ⲱⲧ’ ⲥⲁⲃⲟⲗ ⲛ̅]ⲧⲡⲟⲛⲏⲣⲓⲁ· ⲁⲩⲱ <text:line-break/><text:span text:style-name="T1"> </text:span><text:span text:style-name="T2">(41/18) </text:span> ⲉⲃⲟ̣[ⲗ {ϩ̅ⲓ}ⲧⲙ̅ ⲡϭ]ⲙ̣̅ ⲡϣⲓⲛⲉ ⲙ̅ⲡⲓⲁⲧ’‐ <text:line-break/><text:span text:style-name="T1"> </text:span><text:span text:style-name="T2">(41/19) </text:span> ⲧⲁⲕ[ⲟ ϣⲁ]ⲥ[ⲟⲩ]ϫⲁⲓ̈· ⲁⲩⲱ ϣⲁⲩϫⲓ‐ <text:line-break/><text:span text:style-name="T1"> </text:span><text:span text:style-name="T2">(41/20) </text:span> ⲧⲥ̅ ⲉϩⲣ̣[ⲁⲓ̈ ⲉ]ⲧⲁⲛⲁⲡⲁⲩⲥⲓⲥ ⲛ̅ⲛⲁⲓⲱⲛ· <text:line-break/><text:span text:style-name="T1"> </text:span><text:span text:style-name="T2">(41/21) </text:span> ⲁⲛⲟ̣ⲕ̣ [ϫⲉ] ⲡ̣ⲉϫⲁⲓ̈ ϫⲉ ⲡϫ[ⲟⲉⲓ]ⲥ {ϩ̅ⲓ}ⲉ <text:line-break/><text:span text:style-name="T1"> </text:span><text:span text:style-name="T2">(41/22) </text:span> [ⲛⲁⲓ̈ ϩⲱⲟⲩ] ⲉⲧⲉⲙ̅ⲡⲟⲩⲉ̣ⲓⲙⲉ ϫⲉ <text:line-break/><text:span text:style-name="T1"> </text:span><text:span text:style-name="T2">(41/23) </text:span> [ⲛⲁ ⲛⲓⲙ ⲛⲉ ⲛⲟ]ⲩⲯⲩⲭⲟⲟⲩⲉ ⲉⲩ‐ <text:line-break/><text:span text:style-name="T1"> </text:span><text:span text:style-name="T2">(41/24) </text:span> [ⲛⲁϣⲱⲡⲉ ⲧⲱ]ⲛ̣· ⲁ̣ⲩⲱ ⲡⲉϫⲁϥ ⲛⲁⲓ̈ <text:line-break/><text:span text:style-name="T1"> </text:span><text:span text:style-name="T2">(41/25) </text:span> [ϫⲉ ϩⲛ̅ ⲛⲉⲧⲙ̅ⲙⲁⲩ] ⲁⲡⲉⲡ̅ⲛ̅ⲁ̅ ⲉⲧ’‐ <text:line-break/><text:span text:style-name="T1"> </text:span><text:span text:style-name="T2">(41/26) </text:span> [ϣⲏⲥ ⲁϥⲁϣⲁⲓ̈] ⲛ̅ϩ[ⲏⲧ]ⲟⲩ· ϩⲙ̅ ⲡⲧ→ⲣ̣←ⲉⲩ‐ <text:line-break/><text:span text:style-name="T1"> </text:span><text:span text:style-name="T2">(41/27) </text:span> [ⲥⲱⲣⲙ̅· ⲁⲩⲱ] ϣⲁϥ̣[ⲃⲁ]ⲣ̣ⲓ̣ ⲛ̅ⲧⲉⲯⲩⲭⲏ <text:line-break/><text:span text:style-name="T1"> </text:span><text:span text:style-name="T2">(41/28) </text:span> ⲁ[ⲩⲱ ϣⲁϥⲥⲱ]ⲕ ⲙ̅ⲙ[ⲟ]ⲥ̣ ⲉⲛⲉϩⲃⲏⲩⲉ <text:line-break/><text:span text:style-name="T1"> </text:span><text:span text:style-name="T2">(41/29) </text:span> ⲛ̅ⲧⲉ̣ [ⲧⲡⲟⲛ]ⲏⲣⲓⲁ ⲁ[ⲩ]ⲱ̣ ⲛϥ̅ⲛⲟⲩϫⲉ <text:line-break/><text:span text:style-name="T1"> </text:span><text:span text:style-name="T2">(42/1) </text:span> ⲙ̅ⲙⲟⲥ ⲉϩⲣⲁⲓ̈ ⲉⲩⲃ̅ϣⲉ· ⲁⲩⲱ ⲙⲛ̅ <text:line-break/><text:span text:style-name="T1"> </text:span><text:span text:style-name="T2">(42/2) </text:span> ⲛ̅ⲥⲁ ⲧⲣⲉⲥ{ⲉ̅ⲓ} ⲉⲃⲟⲗ ϣⲁⲩⲧⲁⲁⲥ ⲉ‐ <text:line-break/><text:span text:style-name="T1"> </text:span><text:span text:style-name="T2">(42/3) </text:span> ⲧⲟⲟⲧⲟⲩ ⲛ̅ⲛ̅ⲉⲝⲟⲩⲥ̣ⲓ̣ⲁ ⲛⲁⲓ̈ ⲛ̅ⲧⲁⲩ‐ <text:line-break/><text:span text:style-name="T1"> </text:span><text:span text:style-name="T2">(42/4) </text:span> ϣⲱⲡ[ⲉ] ⲉⲃⲟⲗ {ϩ̅ⲓ}ⲧⲛ̅ ⲡ̣ⲁ̣ⲣ̣ⲭⲱⲛ· ⲁⲩⲱ <text:line-break/><text:span text:style-name="T1"> </text:span><text:span text:style-name="T2">(42/5) </text:span> ϣⲁⲩ[ⲙ]ⲟ̣ⲣⲉⲥ̣ ϩⲛ̅ ϩⲉⲛⲙ[ⲣ̅ⲣ]ⲉ ⲛ̅ⲥⲉⲛⲟⲩ‐ <text:line-break/><text:span text:style-name="T1"> </text:span><text:span text:style-name="T2">(42/6) </text:span> ϫⲉ ⲙ̅ⲙ[ⲟ]ⲥ ⲉⲡⲉϣⲧ[ⲁⲕⲟ]· ⲁⲩⲱ ϣⲁⲩ‐ <text:line-break/><text:span text:style-name="T1"> </text:span><text:span text:style-name="T2">(42/7) </text:span> ⲕⲱⲧⲉ̣ [ⲛ]ⲙ̣̅ⲙⲁⲥ ϣ[ⲁⲛ]ⲧ̣ⲉⲥⲛⲉϩⲥⲉ <text:line-break/><text:span text:style-name="T1"> </text:span><text:span text:style-name="T2">(42/8) </text:span> ⲉⲃⲟⲗ {ϩ̅ⲓ}[ⲧ]ⲛ̅ ⲧⲃ̅ϣ̣[ⲉ· ⲁⲩⲱ ⲛ]ⲥ̅ϫⲓ ⲉ‐ <text:line-break/><text:span text:style-name="T1"> </text:span><text:span text:style-name="T2">(42/9) </text:span> ⲣⲟⲥ ⲙ̅ⲡⲥⲟⲟ̣ⲩⲛ[· ⲁⲩⲱ ⲧⲁⲓ̈] ⲧⲉ ⲑⲉ <text:line-break/><text:span text:style-name="T1"> </text:span><text:span text:style-name="T2">(42/10) </text:span> ⲉⲥϣ[ⲁ]ⲛ̣ϫⲱ[ⲕ ⲉⲃⲟⲗ ϣⲁⲥ]ⲟ̣ⲩϫⲁⲓ̈· <text:line-break/><text:span text:style-name="T1"> </text:span><text:span text:style-name="T2">(42/11) </text:span> ⲁⲛⲟⲕ̣ [ⲇⲉ] ⲡⲉϫ̣[ⲁⲓ̈ ϫⲉ ⲡϫⲟⲉⲓⲥ ⲁ]ⲩ̣ⲱ <text:line-break/><text:span text:style-name="T1"> </text:span><text:span text:style-name="T2">(42/12) </text:span> ⲡⲱⲥ̣ [ⲁ]ϣ ⲁⲥⲣ̅[ϣⲏⲙ ϣⲏⲙ ⲛ̅ϭⲓ ⲧ]ⲯⲩ‐ <text:line-break/><text:span text:style-name="T1"> </text:span><text:span text:style-name="T2">(42/13) </text:span> ⲭⲏ ⲁⲩⲱ ⲛⲥ̅[ⲛⲁⲩϩⲥ̅ ⲉϩⲟⲩⲛ ⲉⲧ]ⲫ̣ⲩ‐ <text:line-break/><text:span text:style-name="T1"> </text:span><text:span text:style-name="T2">(42/14) </text:span> ⲥⲓⲥ ⲛ̅ⲧⲉⲥⲙⲁⲁ[ⲩ ⲏ%0 ⲉϩⲟⲩⲛ ⲉⲡⲣⲱ]‐ <text:line-break/><text:span text:style-name="T1"> </text:span><text:span text:style-name="T2">(42/15) </text:span> ⲙⲉ· ⲧⲟⲧⲉ ⲁϥⲣ[ⲁϣⲉ ⲛ̅ⲧⲁⲣⲓϫⲛⲟⲩϥ <text:line-break/><text:span text:style-name="T1"> </text:span><text:span text:style-name="T2">(42/16) </text:span> ⲉⲡⲁⲓ̈ ⲁⲩⲱ ⲡⲉ̣[ϫⲁϥ ⲛⲁⲓ̈ ϫⲉ ⲁⲗⲏ]‐ <text:line-break/><text:span text:style-name="T1"> </text:span><text:span text:style-name="T2">(42/17) </text:span> ⲑⲱⲥ ⲛ̅ⲧⲕ̣ ⲟ̣[ⲩⲙⲁⲕⲁⲣⲓⲟⲥ ⲉⲡⲓ]‐ <text:line-break/><text:span text:style-name="T1"> </text:span><text:span text:style-name="T2">(42/18) </text:span> ⲇⲏ ⲁⲕⲣ̅ⲛⲟ[ⲉ]ⲓ̣· ⲧ̣[ⲯⲩⲭⲏ ⲉⲧⲙ̅ⲙ]ⲁ̣ⲩ <text:line-break/><text:span text:style-name="T1"> </text:span><text:span text:style-name="T2">(42/19) </text:span> ϣⲁⲩⲧⲣⲉⲥⲟⲩ̣[ⲁϩⲥ̅ ⲛ̅ⲥⲁ ⲕⲉⲩ]{ⲉ̅ⲓ} <text:line-break/><text:span text:style-name="T1"> </text:span><text:span text:style-name="T2">(42/20) </text:span> ⲉⲣⲉⲡ̅’ⲡ̅ⲛ̅ⲁ̅ ⲙ̅ⲡ̣[ⲱⲛϩ̅ ⲛ̅ϩⲏ]ⲧⲥ̅· <text:line-break/><text:soft-page-break/><text:span text:style-name="T1"> </text:span><text:span text:style-name="T2">(42/21) </text:span> ⲧⲁⲓ̈ ⲉϣⲁⲥⲟⲩϫ[ⲁⲓ̈] ⲉ̣ⲃ̣[ⲟⲗ {ϩ̅ⲓ}ⲧ]ⲟ̣ⲟⲧϥ̅ <text:line-break/><text:span text:style-name="T1"> </text:span><text:span text:style-name="T2">(42/22) </text:span> ⲙ̅ⲡⲉⲧⲙ̅ⲙⲁⲩ ⲉ̣ϣ[ⲁⲩ]ⲛⲟⲩϫⲉ <text:line-break/><text:span text:style-name="T1"> </text:span><text:span text:style-name="T2">(42/23) </text:span> ϭⲉ ⲁ̣ⲛ̣ ⲙ̅ⲙⲟⲥ ⲉϩⲟⲩⲛ [ⲉⲕ]ⲉ̣[ⲥ]ⲁⲣⲝ̅ <text:line-break/><text:span text:style-name="T1"> </text:span><text:span text:style-name="T2">(42/24) </text:span> ⲁⲩ[ⲱ] ⲡ̣ⲉϫⲁⲓ̈ ϫⲉ ⲡϫ[ⲟⲉⲓⲥ ⲛⲁⲓ̈] <text:line-break/><text:span text:style-name="T1"> </text:span><text:span text:style-name="T2">(42/25) </text:span> ϩⲱⲟⲩ ⲉⲛⲧⲁⲩⲥⲟ̣[ⲟⲩⲛ ⲁⲩⲱ] <text:line-break/><text:span text:style-name="T1"> </text:span><text:span text:style-name="T2">(42/26) </text:span> ⲁⲩϩⲛ̅ⲧⲟⲩ ⲉⲃⲟ̣[ⲗ ⲉⲩⲛⲁⲃⲱⲕ] <text:line-break/><text:span text:style-name="T1"> </text:span><text:span text:style-name="T2">(42/27) </text:span> ⲉⲧⲱ̣ⲛ̣ ⲛ̅ϭⲓ̣ [ⲛⲟⲩⲯⲩⲭⲏ· ⲧⲟⲧⲉ] <text:line-break/><text:span text:style-name="T1"> </text:span><text:span text:style-name="T2">(42/28) </text:span> ⲡⲉϫ̣ⲁ̣ϥ̣ ⲛ̣[ⲁⲓ̈] ϫ̣ⲉ̣ [ⲡⲙⲁ ⲉⲣⲉⲛ̅]‐ <text:line-break/><text:span text:style-name="T1"> </text:span><text:span text:style-name="T2">(42/29) </text:span> ⲁⲅⲅⲉ̣ⲗⲟ̣[ⲥ] ⲛ̣̅ⲧⲙ̅ⲛ̣̅̅[̅ⲧ̅’̅ϩⲏⲕⲉ ⲛⲁ]‐ <text:line-break/><text:span text:style-name="T1"> </text:span><text:span text:style-name="T2">(42/30) </text:span> ⲃⲱⲕ ⲉⲙ̣[ⲁⲩ] ⲥ̣ⲉⲛ̣[ⲁϫⲓⲧⲟⲩ ⲉ]‐ <text:line-break/><text:span text:style-name="T1"> </text:span><text:span text:style-name="T2">(42/31) </text:span> ⲡⲙⲁ ⲉⲧⲙ̅[ⲙ]ⲁ̣ⲩ·ⲡ̣[ⲙⲁ ⲉⲧ]ⲉ <text:line-break/><text:span text:style-name="T1"> </text:span><text:span text:style-name="T2">(43/1) </text:span> ⲙ̅ⲙⲛ̅ ⲙⲉⲧⲁ̣[ⲛⲟⲓⲁ ⲉⲥϣ]ⲱⲡⲉ ⲙ̅ⲙⲁⲩ <text:line-break/><text:span text:style-name="T1"> </text:span><text:span text:style-name="T2">(43/2) </text:span> ⲁⲩⲱ ⲛ̅ⲥⲉⲁ[ⲣⲉϩ ⲉⲣⲟⲟ]ⲩ ⲉⲡⲉϩⲟⲟⲩ <text:line-break/><text:span text:style-name="T1"> </text:span><text:span text:style-name="T2">(43/3) </text:span> ⲉⲧⲟⲩⲛⲁⲃ[ⲁⲥⲁⲛⲓⲍⲉ ⲛ̅ⲛ]ⲉⲧⲁϩϫⲉ <text:line-break/><text:span text:style-name="T1"> </text:span><text:span text:style-name="T2">(43/4) </text:span> ⲟⲩⲁ ⲉⲡⲉ[ⲡ̅ⲛ̅ⲁ̅ ⲉⲧⲟⲩⲁⲁⲃ] ⲛ̣̅ⲥⲉⲣ̅ⲕⲟ‐ <text:line-break/><text:span text:style-name="T1"> </text:span><text:span text:style-name="T2">(43/5) </text:span> ⲗⲁⲍⲉ ⲙ̅ⲙⲟⲟ̣[ⲩ ϩⲛ̅ ⲟⲩⲕ]ⲟ̣ⲗⲁⲥⲓⲥ ⲛ̅‐ <text:line-break/><text:span text:style-name="T1"> </text:span><text:span text:style-name="T2">(43/6) </text:span> ϣⲁ ⲉⲛⲉϩ· ⲁⲛⲟ[ⲕ ⲇⲉ ⲡⲉ]ϫⲁⲓ̈ ϫⲉ [ⲡϫⲟ]‐ <text:line-break/><text:span text:style-name="T1"> </text:span><text:span text:style-name="T2">(43/7) </text:span> ⲉⲓⲥ ⲛ̅ⲧⲁϥ{ⲉ̣̅̅[̅ⲓ}] ⲧⲱⲛ̣ [ⲛ̅ⲧⲟϥ ⲛ̅]ϭⲓ ⲡⲉ̣‐ <text:line-break/><text:span text:style-name="T1"> </text:span><text:span text:style-name="T2">(43/8) </text:span> ⲡ̅ⲛ̅ⲁ̅ ⲉ[ⲧ’ϣ]ⲏ̣ⲥ ⲧ[ⲟⲧⲉ ⲡⲉϫⲁϥ ⲛⲁⲓ̈] <text:line-break/><text:span text:style-name="T1"> </text:span><text:span text:style-name="T2">(43/9) </text:span> ϫⲉ ⲡⲙⲏⲧ̣ⲣ̣ⲟⲡ[ⲁ]ⲧ̣ⲱ̣[ⲣ ⲡⲉⲧⲛⲁϣⲉ] <text:line-break/><text:span text:style-name="T1"> </text:span><text:span text:style-name="T2">(43/10) </text:span> ⲡⲉϥ[ⲛⲁ ⲡⲉ]ⲡ̣̅̅[̅ⲛ̅ⲁ̅] ⲉⲧ[ⲟ]ⲩⲁ[ⲁⲃ ϩⲛ̅ ⲥⲙⲟⲧ’] <text:line-break/><text:span text:style-name="T1"> </text:span><text:span text:style-name="T2">(43/11) </text:span> ⲛ[ⲓⲙ ⲡϣⲁⲛϩⲧⲏ]ϥ ⲁⲩⲱ̣ [ⲉⲧ’ϣⲉⲡ’] <text:line-break/><text:span text:style-name="T1"> </text:span><text:span text:style-name="T2">(43/12) </text:span> {ϩ̅ⲓ}[ⲥⲉ ⲛⲙ̅ⲙⲏⲧⲛ̅ ⲉⲧⲉ ⲡⲁⲓ̈ ⲡⲉ ⲧⲉⲡⲓ]‐ <text:line-break/><text:span text:style-name="T1"> </text:span><text:span text:style-name="T2">(43/13) </text:span> ⲛⲟ̣[ⲓⲁ ⲛ̅ⲧⲡⲣⲟⲛⲟⲓⲁ ⲛ̅ⲟⲩⲟⲉⲓⲛ·] <text:line-break/><text:span text:style-name="T1"> </text:span><text:span text:style-name="T2">(43/14) </text:span> [ⲁⲩⲱ ⲁϥⲧⲟⲩⲛⲟⲥ ⲙ̅ⲡⲉⲥⲡⲉⲣ]‐ <text:line-break/><text:span text:style-name="T1"> </text:span><text:span text:style-name="T2">(43/15) </text:span> ⲙ[ⲁ ⲛ̅ⲧⲅⲉⲛⲉⲁ ⲛ̅ⲧⲉⲗⲓⲟⲛ ⲙⲛ̅ ⲡⲉϥ]‐ <text:line-break/><text:span text:style-name="T1"> </text:span><text:span text:style-name="T2">(43/16) </text:span> ⲙⲉ̣ⲉ[ⲩⲉ ⲁⲩⲱ ⲡⲟⲩⲟⲉⲓⲛ ⲛ̅ϣⲁ ⲉⲛⲉϩ] <text:line-break/><text:span text:style-name="T1"> </text:span><text:span text:style-name="T2">(43/17) </text:span> ⲙ̣̅ⲡⲣ[ⲱ]ⲙ̣[ⲉ ⲛ̅ⲧⲁⲣⲉϥⲙ̅ⲙⲉ ⲛ̅ϭⲓ] <text:line-break/><text:span text:style-name="T1"> </text:span><text:span text:style-name="T2">(43/18) </text:span> ⲡϣⲟⲣⲡ̅’ ⲛ̅ⲁ̣[ⲣⲭⲱⲛ ϫⲉ ⲥⲉϫⲟⲥⲉ] <text:line-break/><text:span text:style-name="T1"> </text:span><text:span text:style-name="T2">(43/19) </text:span> ⲡⲁⲣⲁⲣⲟϥ ϩⲙ̅ [ⲡϫⲓⲥⲉ ⲁⲩⲱ ⲥⲉⲙⲉ]‐ <text:line-break/><text:span text:style-name="T1"> </text:span><text:span text:style-name="T2">(43/20) </text:span> ⲉⲩⲉ ⲡⲁⲣⲁⲣ[ⲟϥ ⲁϥⲟⲩⲱϣⲉ ϭⲉ] <text:line-break/><text:span text:style-name="T1"> </text:span><text:span text:style-name="T2">(43/21) </text:span> ⲉⲁⲙⲁϩⲧⲉ ⲙ̣̅[ⲡⲟⲩⲙⲟⲕⲙⲉⲕ ⲉϥⲟ] <text:line-break/><text:span text:style-name="T1"> </text:span><text:span text:style-name="T2">(43/22) </text:span> ⲛ̅ⲁⲧ’ⲥⲟⲟⲩ[ⲛ ϫⲉ ⲥⲉϫⲟⲥⲉ ⲉⲣⲟϥ ⲛ̅]‐ <text:line-break/><text:span text:style-name="T1"> </text:span><text:span text:style-name="T2">(43/23) </text:span> ϩⲣⲁⲓ̈ ϩⲙ̅ ⲡⲙ̣[ⲉⲉⲩⲉ ⲁⲩⲱ ϫⲉ ϥⲛⲁϣ‐ <text:line-break/><text:span text:style-name="T1"> </text:span><text:span text:style-name="T2">(43/24) </text:span> ⲁⲙⲁϩⲧⲉ ⲙ̅[ⲙⲟⲟⲩ ⲁⲛ ⲁϥⲉⲓⲣⲉ ⲛ̅ⲟⲩ]‐ <text:line-break/><text:span text:style-name="T1"> </text:span><text:span text:style-name="T2">(43/25) </text:span> ϣⲟϫⲛⲉ ⲙⲛ̣̅ [ⲛⲉϥⲉⲝⲟⲩⲥⲓⲁ ⲉⲧⲉ] <text:line-break/><text:span text:style-name="T1"> </text:span><text:span text:style-name="T2">(43/26) </text:span> ⲛⲉϥϭⲟⲙ [ⲛⲉ· ⲁⲩⲱ ⲁⲩⲣ̅ ⲛⲟⲉⲓⲕ] <text:line-break/><text:span text:style-name="T1"> </text:span><text:span text:style-name="T2">(43/27) </text:span> ⲉⲧⲥⲟⲫⲓⲁ ⲛ̣̅[ⲛⲟⲩⲉⲣⲏⲟⲩ· ⲁⲩⲱ] <text:line-break/><text:span text:style-name="T1"> </text:span><text:span text:style-name="T2">(43/28) </text:span> ⲁⲩϫⲡⲟ ⲉⲃⲟ[ⲗ {ϩ̅ⲓ}ⲧⲟⲟⲧⲟⲩ ⲉⲩⲥⲁϣ] <text:line-break/><text:span text:style-name="T1"> </text:span><text:span text:style-name="T2">(43/29) </text:span> ⲛ̅ⲇⲓⲙⲁⲣ[ⲙⲉⲛⲏ ⲉⲧⲉ ⲧⲁⲓ̈ ⲧⲉ ⲧϩⲁⲏ <text:line-break/><text:span text:style-name="T1"> </text:span><text:span text:style-name="T2">(43/30) </text:span> ⲛ̅ⲙ̅ⲙ[ⲣ̅ⲣⲉ ⲉⲧ’ϣⲃ̅ⲃⲓⲟⲉⲓⲧ’· ⲁⲩⲱ] <text:line-break/><text:span text:style-name="T1"> </text:span><text:span text:style-name="T2">(43/31) </text:span> ⲉⲥⲉ [ⲙ̅ⲙⲓⲛⲉ ϫⲉ ⲥⲉϣⲃ̅ⲃⲓⲟⲉⲓⲧ’] <text:line-break/><text:span text:style-name="T1"> </text:span><text:span text:style-name="T2">(44/1) </text:span> ⲉⲛⲉⲩ[ⲉⲣⲏⲩ ⲁⲩⲱ] ⲥ̣ⲙⲟⲕϩ̅ ⲁⲩⲱ <text:line-break/><text:span text:style-name="T1"> </text:span><text:span text:style-name="T2">(44/2) </text:span> ⲥϭⲟⲙ ⲉ[ⲧⲁⲓ̈ ⲉⲛⲧⲁ]ⲩ̣ⲙⲟⲩϫⲕ̅ ⲙ̅ⲙⲟⲥ <text:line-break/><text:span text:style-name="T1"> </text:span><text:span text:style-name="T2">(44/3) </text:span> ⲛ̅ϭⲓ ⲛ̅ⲛⲟ̣[ⲩⲧⲉ ⲁⲩⲱ] ⲛ̣̅ⲁⲅⲅⲉⲗⲟⲥ <text:line-break/><text:span text:style-name="T1"> </text:span><text:span text:style-name="T2">(44/4) </text:span> ⲁⲩⲱ ⲛ̣̅[ⲇⲁⲓⲙⲱⲛ ⲁⲩ]ⲱ ⲛ̅ⲅⲉⲛⲉⲁ <text:line-break/><text:span text:style-name="T1"> </text:span><text:span text:style-name="T2">(44/5) </text:span> ⲧⲏⲣⲟ[ⲩ ϣⲁϩⲟⲩⲛ ⲉ]ⲡ̣ⲟⲟⲩ ⲛ̅ϩⲟⲟⲩ· <text:line-break/><text:soft-page-break/><text:span text:style-name="T1"> </text:span><text:span text:style-name="T2">(44/6) </text:span> ⲉⲃⲟⲗ [ⲅⲁⲣ ϩⲛ̅ ⲑⲓ]ⲙⲁⲣⲙⲉⲛⲏ ⲉⲧⲙ̅‐ <text:line-break/><text:span text:style-name="T1"> </text:span><text:span text:style-name="T2">(44/7) </text:span> ⲙⲁⲩ ⲁ[ⲩⲟⲩⲱⲛ]ϩ̅ ⲉⲃⲟ̣ⲗ ⲛ̅ϭⲓ ⲙ̅ⲛ̅ⲧ <text:line-break/><text:span text:style-name="T1"> </text:span><text:span text:style-name="T2">(44/8) </text:span> ϣⲁϥ[ⲧⲉ ⲛⲓⲙ ⲁ]ⲩⲱ [ⲡϫⲓ]ⲛϭⲟⲛⲥ̅ <text:line-break/><text:span text:style-name="T1"> </text:span><text:span text:style-name="T2">(44/9) </text:span> [ⲁⲩⲱ ⲡⲟⲩⲁ ⲙ̅ⲛ̅]̅ⲧ̅ⲙⲣ̅ⲣⲉ̣ ⲛ̣̅ⲧⲃ̅ϣⲉ <text:line-break/><text:span text:style-name="T1"> </text:span><text:span text:style-name="T2">(44/10) </text:span> [ⲁⲩⲱ ⲧ]ⲙ̣̅̅ⲛ̣̅̅[̅ⲧ̅’̅]ⲁⲧ̣[ⲥ]ⲟ̣ⲟ[ⲩⲛ] ⲁ̣[ⲩ]ⲱ ⲡⲁ‐ <text:line-break/><text:span text:style-name="T1"> </text:span><text:span text:style-name="T2">(44/11) </text:span> [ⲣⲁⲅⲅⲉⲗ]ⲓⲁ ⲛⲓⲙ [ⲉⲧϩⲟⲣϣ̅ ⲙⲛ̅] ⲛ̣[ⲓ]ⲛⲟ‐ <text:line-break/><text:span text:style-name="T1"> </text:span><text:span text:style-name="T2">(44/12) </text:span> [ⲃⲉ ⲉⲧϩⲟ]ⲣϣ̅ ⲙ̣[ⲛ̅ ⲛⲓϭⲟⲙ ⲛ̅ϩⲣ̅ⲧ]ⲉ̣ <text:line-break/><text:span text:style-name="T1"> </text:span><text:span text:style-name="T2">(44/13) </text:span> [ⲁⲩⲱ ⲧⲁⲓ̈ ⲧⲉ ⲑⲉ ⲉⲛⲧⲁⲩⲧⲣⲉⲧ’ⲕ]ⲧ̣ⲓ‐ <text:line-break/><text:span text:style-name="T1"> </text:span><text:span text:style-name="T2">(44/14) </text:span> [ⲥⲓⲥ ⲧⲏⲣⲥ̅ ⲣ̅ⲃⲗ̅ⲗⲏ ϫⲉⲕⲁⲁⲥ ⲛ̅ⲛⲉ]ⲩ̣‐ <text:line-break/><text:span text:style-name="T1"> </text:span><text:span text:style-name="T2">(44/15) </text:span> [ⲥⲟⲩⲱⲛ ⲡⲛⲟⲩⲧⲉ ⲉⲧⲙ̅ⲡⲉ]ⲩⲛ̅ <text:line-break/><text:span text:style-name="T1"> </text:span><text:span text:style-name="T2">(44/16) </text:span> [ⲧⲡⲉ ⲧⲏⲣⲟⲩ· ⲁⲩⲱ ⲉⲧⲃ]ⲉ [ⲧ]ⲙ̅ⲣⲣ[ⲉ] <text:line-break/><text:span text:style-name="T1"> </text:span><text:span text:style-name="T2">(44/17) </text:span> [ⲛ̅ⲧⲃ̅ϣⲉ ⲁⲩϩⲱⲡ’ ⲛ̅ϭⲓ] ⲛ[ⲟ]ⲩⲛⲟⲃⲉ <text:line-break/><text:span text:style-name="T1"> </text:span><text:span text:style-name="T2">(44/18) </text:span> [ⲁⲩⲙⲟⲩⲣ ⲅⲁⲣ ⲛ̅ϩⲛ̅]ϣⲓ ⲙⲛ̣̅ ϩⲛ̅ⲟⲩⲟ‐ <text:line-break/><text:span text:style-name="T1"> </text:span><text:span text:style-name="T2">(44/19) </text:span> [ⲉⲓϣ ⲙⲛ̅ ϩⲛ̅ⲕⲉⲣⲟⲥ] ⲉⲥⲟ ⲛ̅ϫⲟⲉⲓⲥ <text:line-break/><text:span text:style-name="T1"> </text:span><text:span text:style-name="T2">(44/20) </text:span> [ⲉϫⲙ̅ ⲡⲧⲏⲣϥ̅· ⲁⲩ]ⲱ ⲁϥⲣ̅ϩⲧⲏϥ ⲉ‐ <text:line-break/><text:span text:style-name="T1"> </text:span><text:span text:style-name="T2">(44/21) </text:span> [ϩⲣⲁⲓ̈ ⲉϫⲛ̅ ϩⲱⲃ ⲛⲓⲙ] ⲉⲁϥϣⲱⲡⲉ <text:line-break/><text:span text:style-name="T1"> </text:span><text:span text:style-name="T2">(44/22) </text:span> [ⲉⲃⲟⲗ {ϩ̅ⲓ}ⲧⲟⲟⲧϥ̅· ⲡ]ⲁⲗⲓⲛ ⲁϥϣⲟ‐ <text:line-break/><text:span text:style-name="T1"> </text:span><text:span text:style-name="T2">(44/23) </text:span> [ϫⲛⲉ ⲉⲧⲣⲉϥⲉⲓⲛⲉ ⲛ̅ⲟ]ⲩⲕⲁⲧⲁ‐ <text:line-break/><text:span text:style-name="T1"> </text:span><text:span text:style-name="T2">(44/24) </text:span> [ⲕⲗⲩⲥⲙⲟⲥ ⲉϩⲣⲁⲓ̈ ⲉ]ϫⲛ̅ ⲡⲧⲁⲙⲓⲟ <text:line-break/><text:span text:style-name="T1"> </text:span><text:span text:style-name="T2">(44/25) </text:span> [ⲛ̅ⲧⲉ ⲡⲣⲱⲙⲉ· ⲧⲙⲛ̅]ⲧⲛⲟϭ ⲇⲉ ⲛ̅‐ <text:line-break/><text:span text:style-name="T1"> </text:span><text:span text:style-name="T2">(44/26) </text:span> [ⲧⲉ ⲡⲟⲩⲟⲉⲓⲛ ⲛ̅ⲧ]ⲉ ⲧⲡⲣⲟⲛⲟⲓⲁ <text:line-break/><text:span text:style-name="T1"> </text:span><text:span text:style-name="T2">(44/27) </text:span> [ⲁⲥⲧⲥⲁⲃⲉ ⲛⲱϩⲉ ⲁ]ⲩⲱ ⲁϥⲧⲁ‐ <text:line-break/><text:span text:style-name="T1"> </text:span><text:span text:style-name="T2">(44/28) </text:span> [ϣⲉ ⲟⲉⲓϣ ⲙ̅ⲡⲉⲥ]ⲡⲉⲣⲙⲁ ⲧⲏⲣϥ̅ <text:line-break/><text:span text:style-name="T1"> </text:span><text:span text:style-name="T2">(44/29) </text:span> [ⲉⲧⲉ ⲛⲁⲓ̈ ⲛⲉ ⲛ̅ϣⲏ]ⲣ̣ⲉ̣ ⲛ̅ⲛ̅ⲣⲱⲙⲉ <text:line-break/><text:span text:style-name="T1"> </text:span><text:span text:style-name="T2">(44/30) </text:span> [ⲁⲩⲱ ⲙ̅ⲡⲟⲩⲥⲱⲧⲙ̅ ⲛⲁ]ϥ ⲛ̅ϭⲓ <text:line-break/><text:span text:style-name="T1"> </text:span><text:span text:style-name="T2">(45/1) </text:span> ⲛⲉⲧⲟ ⲛ̅ϣⲙ̅[ⲙⲟ ⲉⲣⲟϥ] ⲛ̅ⲕⲁⲧⲁ <text:line-break/><text:span text:style-name="T1"> </text:span><text:span text:style-name="T2">(45/2) </text:span> ⲑⲉ ⲁⲛ ⲉⲛⲧⲁ[ⲙⲱⲩⲥⲏ]ⲥ ϫⲟⲟⲥ ϫⲉ <text:line-break/><text:span text:style-name="T1"> </text:span><text:span text:style-name="T2">(45/3) </text:span> ⲁⲩϩⲱⲡ ⲙ̅[ⲙⲟⲟⲩ ϩ]ⲛ̣̅ [ⲟ]ⲩ̣ⲕⲓⲃⲱⲧⲟⲥ <text:line-break/><text:span text:style-name="T1"> </text:span><text:span text:style-name="T2">(45/4) </text:span> ⲁⲗⲗⲁ ⲛ̅ⲧⲁ̣[ⲩϩⲱⲡ’ ⲙ̅ⲙⲟ]ⲟ̣ⲩ ϩⲛ̅ ⲟⲩ <text:line-break/><text:span text:style-name="T1"> </text:span><text:span text:style-name="T2">(45/5) </text:span> ⲧⲟⲡⲟⲥ· ⲟⲩ[ⲙⲟⲛⲟⲛ ⲛⲱ]ϩⲉ ⲁⲗⲗⲁ <text:line-break/><text:span text:style-name="T1"> </text:span><text:span text:style-name="T2">(45/6) </text:span> ϩⲉⲛⲕⲉⲣⲱⲙⲉ ⲉ[ⲛⲁϣⲱ]ⲟ̣ⲩ ⲉⲃⲟⲗ <text:line-break/><text:span text:style-name="T1"> </text:span><text:span text:style-name="T2">(45/7) </text:span> ϩⲛ̅ ⲧⲅⲉⲛ[ⲉⲁ] ⲛ̅ⲁⲧ’̣[ⲕⲓⲙ· ⲁ]ⲩⲃⲱⲕ ⲉ‐ <text:line-break/><text:span text:style-name="T1"> </text:span><text:span text:style-name="T2">(45/8) </text:span> ϩⲟⲩⲛ ⲉⲩ[ⲧⲟⲡⲟⲥ ⲁⲩϩⲱⲡ’] ⲙ̅ⲙⲟⲟⲩ <text:line-break/><text:span text:style-name="T1"> </text:span><text:span text:style-name="T2">(45/9) </text:span> ϩⲛ̅ ⲟⲩⲕⲗ[ⲟⲟⲗⲉ ⲛ̅ⲟⲩⲟⲉⲓⲛ· ⲁ]ⲩⲱ <text:line-break/><text:span text:style-name="T1"> </text:span><text:span text:style-name="T2">(45/10) </text:span> ⲁϥ̣ⲥ[ⲟⲩⲱⲛ ⲧⲉϥⲁⲩⲑⲉⲛⲧⲉⲓⲁ] ⲁⲩⲱ <text:line-break/><text:span text:style-name="T1"> </text:span><text:span text:style-name="T2">(45/11) </text:span> ⲛ[ⲉⲥⲛⲙ̅ⲙⲁϥ ⲛ̅ϭⲓ ⲧⲁⲡⲟⲩⲟⲉⲓⲛ] <text:line-break/><text:span text:style-name="T1"> </text:span><text:span text:style-name="T2">(45/12) </text:span> ⲉⲧ̣[ⲁⲥⲣ̅ ⲟⲩⲟⲉⲓⲛ ⲉⲣⲟⲟⲩ ⲉⲃⲟⲗ] <text:line-break/><text:span text:style-name="T1"> </text:span><text:span text:style-name="T2">(45/13) </text:span> ϫⲉ [ⲁϥⲉⲓⲛⲉ ⲛ̅ⲟⲩⲕⲁⲕⲉ ⲉϩⲣⲁ]ⲓ̣̈ ⲉ‐ <text:line-break/><text:span text:style-name="T1"> </text:span><text:span text:style-name="T2">(45/14) </text:span> ϫⲛ̅ ⲡ̣[ⲕⲁϩ ⲧⲏⲣϥ̅ ⲁⲩⲱ ⲁϥⲧⲁⲙⲓ]ⲟ <text:line-break/><text:span text:style-name="T1"> </text:span><text:span text:style-name="T2">(45/15) </text:span> ⲛ̅ⲟⲩ[ϣ]ⲟ̣[ϫⲛⲉ ⲙⲛ̅ ⲛⲉϥϭⲟⲙ ⲁϥ]ϫⲟ‐ <text:line-break/><text:span text:style-name="T1"> </text:span><text:span text:style-name="T2">(45/16) </text:span> ⲟⲩ ⲛ[ⲛ]ⲉ̣[ϥⲁⲅⲅⲉⲗⲟⲥ ϣⲁ ϣⲉⲉⲣ]ⲉ̣ <text:line-break/><text:span text:style-name="T1"> </text:span><text:span text:style-name="T2">(45/17) </text:span> ⲛ̅ⲛ̅ⲣⲱⲙⲉ ϫ̣[ⲉⲕⲁⲁⲥ ⲉⲩⲛⲁϫⲓ ⲛⲁ]ⲩ <text:line-break/><text:span text:style-name="T1"> </text:span><text:span text:style-name="T2">(45/18) </text:span> ⲉⲃⲟⲗ ⲛ̅ϩⲏⲧⲟ̣[ⲩ· ⲁⲩⲱ ⲛ̅ⲥⲉ]ⲧⲟⲩ‐ <text:line-break/><text:span text:style-name="T1"> </text:span><text:span text:style-name="T2">(45/19) </text:span> ⲛⲟⲥ ⲛ̅ⲟⲩⲥⲡ[ⲉⲣⲙⲁ ⲁⲩⲙ̅ⲧⲟⲛ] ⲛⲁⲩ· <text:line-break/><text:span text:style-name="T1"> </text:span><text:span text:style-name="T2">(45/20) </text:span> ⲁⲩⲱ ⲉⲧⲉ ⲙ̅[ⲡⲟⲩϯ ⲙⲁⲧⲉ ⲙ̅]ⲡϣⲟ‐ <text:line-break/><text:span text:style-name="T1"> </text:span><text:span text:style-name="T2">(45/21) </text:span> ⲣⲡ̅’ ⲛ̅ⲥⲟⲡ· ⲁ̣[ⲩⲱ ⲛ̅ⲧⲁⲣⲟⲩⲧ]ⲙ̅ϯ[ⲙ]ⲁ̣‐ <text:line-break/><text:span text:style-name="T1"> </text:span><text:span text:style-name="T2">(45/22) </text:span> ⲧⲉ ⲇⲉ ⲁⲩ[ⲥⲱⲟⲩϩ ⲉϩⲟⲩⲛ ⲟⲛ ⲙⲛ̅] <text:line-break/><text:soft-page-break/><text:span text:style-name="T1"> </text:span><text:span text:style-name="T2">(45/23) </text:span> ⲛⲉⲩⲉⲣⲏⲟ[ⲩ] ⲁ[ⲩⲉⲓⲣⲉ ⲛ̅ⲟⲩϣⲟϫⲛⲉ] <text:line-break/><text:span text:style-name="T1"> </text:span><text:span text:style-name="T2">(45/24) </text:span> {ϩ̅ⲓ} ⲟⲩⲥⲟⲡ ⲁ̣ⲩⲧ̣[ⲁⲙⲓⲟ ⲛ̅ⲟⲩⲡ̅ⲛⲁ̅] <text:line-break/><text:span text:style-name="T1"> </text:span><text:span text:style-name="T2">(45/25) </text:span> ⲉϥϣⲏⲥ ⲙ̅[ⲡⲓⲛⲉ ⲙ̅ⲡ̅ⲛ̅ⲁ̅ ⲉⲧⲁϩ{ⲉⲓ}] <text:line-break/><text:span text:style-name="T1"> </text:span><text:span text:style-name="T2">(45/26) </text:span> ⲉϩⲣⲁⲓ̈· ϩⲱ[ⲥⲧⲉ ⲉⲃⲟⲗ ⲛ̅ϩⲏⲧϥ̅ ⲉ]‐ <text:line-break/><text:span text:style-name="T1"> </text:span><text:span text:style-name="T2">(45/27) </text:span> ⲥⲱⲱϥ ⲛ̅ⲛ̣̅[ⲯⲩⲭⲟⲟⲩⲉ· ⲁⲩⲱ ⲁⲩ]‐ <text:line-break/><text:span text:style-name="T1"> </text:span><text:span text:style-name="T2">(45/28) </text:span> ϣⲃ̅ⲧⲟⲩ [ϩ]ⲙ̣̅ [ⲡⲟⲩⲉⲓⲛⲉ ⲛ̅ϭⲓ ⲛ̅ⲁⲅ]‐ <text:line-break/><text:span text:style-name="T1"> </text:span><text:span text:style-name="T2">(45/29) </text:span> ⲅⲉⲗⲟ[ⲥ ⲕⲁⲧⲁ ⲡⲓⲛⲉ ⲙ̅ⲡⲟⲩⲥⲟⲉⲓϣ] <text:line-break/><text:span text:style-name="T1"> </text:span><text:span text:style-name="T2">(45/30) </text:span> ⲉⲩⲙ̣[ⲟⲩϩ ⲙ̅ⲙⲟⲟⲩ ϩⲙ̅ ⲡⲛⲁ ⲛ̅ⲕⲁⲕⲉ] <text:line-break/><text:span text:style-name="T1"> </text:span><text:span text:style-name="T2">(46/1) </text:span> ⲉⲛⲧⲁⲩ[ⲕⲉⲣⲁ ⲙ̅ⲙ]ⲟϥ ⲉϫⲱⲟⲩ <text:line-break/><text:span text:style-name="T1"> </text:span><text:span text:style-name="T2">(46/2) </text:span> ⲁⲩⲱ ⲙ̅ⲡ̣[ⲟⲛⲏⲣⲓⲁ] ⲁⲩⲉⲓⲛⲉ ⲛ̅ⲟⲩ‐ <text:line-break/><text:span text:style-name="T1"> </text:span><text:span text:style-name="T2">(46/3) </text:span> ⲛⲟⲩⲃ ⲙⲛ̅ [ⲟⲩϩⲁⲧ’] ⲙⲛ̅ ⲟⲩⲇⲱⲣⲟⲛ <text:line-break/><text:span text:style-name="T1"> </text:span><text:span text:style-name="T2">(46/4) </text:span> ⲙⲛ̅ ⲟⲩ̣[ϩⲟⲙⲧ̅’ ⲙⲛ̅ ⲟ]ⲩⲃⲁⲛⲓⲡⲉ <text:line-break/><text:span text:style-name="T1"> </text:span><text:span text:style-name="T2">(46/5) </text:span> ⲙⲛ̅ ⲟⲩ̣[ⲙⲉⲧⲁⲗⲗⲟ]ⲛ· ⲙⲛ̅ ⲅⲉⲛⲟⲥ <text:line-break/><text:span text:style-name="T1"> </text:span><text:span text:style-name="T2">(46/6) </text:span> ⲛⲓⲙ ⲛ̅[ⲧⲉ ⲛⲓⲉⲓ]ⲇ̣ⲟⲥ· ⲁⲩⲱ ⲁⲩⲥⲱⲕ <text:line-break/><text:span text:style-name="T1"> </text:span><text:span text:style-name="T2">(46/7) </text:span> ⲛ̅ⲛ̅ⲣⲱ̣[ⲙⲉ ⲉϩ]ⲣ̣ⲁⲓ̈ ⲉϩⲉⲛⲛⲟϭ ⲛ̅ⲣⲟ‐ <text:line-break/><text:span text:style-name="T1"> </text:span><text:span text:style-name="T2">(46/8) </text:span> ⲟⲩϣ [ⲛⲁⲓ̈ ⲉⲛⲧⲁ]ⲩ̣[ⲟⲩ]ⲁ̣ϩⲟⲩ ⲛ̅ⲥⲱ‐ <text:line-break/><text:span text:style-name="T1"> </text:span><text:span text:style-name="T2">(46/9) </text:span> ⲟⲩ ⲉ̣[ⲩⲥⲱⲣⲙ̅ ⲙ̅ⲙⲟⲟ]ⲩ̣ ϩⲛ̅ ϩⲁϩ ⲙ̅‐ <text:line-break/><text:span text:style-name="T1"> </text:span><text:span text:style-name="T2">(46/10) </text:span> ⲡⲗ[ⲁⲛⲏ ⲁⲩⲣ̅ ϩⲗ̅ⲗⲟ ⲉⲩ]ⲟ̣ ⲛ̣̅ⲛⲁⲧ’‐ <text:line-break/><text:span text:style-name="T1"> </text:span><text:span text:style-name="T2">(46/11) </text:span> ⲥⲣ̣̅ⲃ[ⲉ· ⲁⲩⲙⲟⲩ ⲉⲙⲡⲟⲩϭ]ⲛ̅ ⲗ̣ⲁⲁⲩ <text:line-break/><text:span text:style-name="T1"> </text:span><text:span text:style-name="T2">(46/12) </text:span> ⲙ̣̅[ⲙⲉ ⲁⲩⲱ ⲙ̅ⲡⲟⲩⲥⲟⲩⲱⲛ] ⲡⲛⲟⲩ‐ <text:line-break/><text:span text:style-name="T1"> </text:span><text:span text:style-name="T2">(46/13) </text:span> [ⲧⲉ ⲛ̅ⲧⲙⲉ· ⲁⲩⲱ ⲧⲁⲓ̈ ⲧⲉ ⲑⲉ] ⲉⲛ‐ <text:line-break/><text:span text:style-name="T1"> </text:span><text:span text:style-name="T2">(46/14) </text:span> ⲧ[ⲁⲩⲣ̅ ⲧⲕⲧⲓⲥⲓⲥ ⲧⲏⲣⲥ̅ ⲛ̅ϩⲉⲛ]ϩ̣ⲙ̅ϩⲁⲗ <text:line-break/><text:span text:style-name="T1"> </text:span><text:span text:style-name="T2">(46/15) </text:span> [ⲛ̅ϣⲁ ⲉⲛⲉϩ ϫⲛ̅ ⲛ̅ⲧⲕⲁⲧⲁⲃ]ⲟ̣ⲗⲏ ⲙ̅‐ <text:line-break/><text:span text:style-name="T1"> </text:span><text:span text:style-name="T2">(46/16) </text:span> [ⲡⲕⲟⲥⲙⲟⲥ ϣⲁϩⲣⲁⲓ̈] ⲉ[ⲧ]ⲉ̣ⲛⲟⲩ· <text:line-break/><text:span text:style-name="T1"> </text:span><text:span text:style-name="T2">(46/17) </text:span> [ⲁⲩⲱ ⲁⲩϫⲓ ⲛ̅ϩⲛ̅ⲥ{ϩ̅ⲓ}]ⲁⲙ[ⲉ ⲁ]ⲩϫⲡⲟ <text:line-break/><text:span text:style-name="T1"> </text:span><text:span text:style-name="T2">(46/18) </text:span> ⲉ̣[ⲃⲟⲗ ϩⲙ̅ ⲡⲕⲁⲕⲉ] ⲛ̅ϩⲉⲛϣⲏⲣⲉ <text:line-break/><text:span text:style-name="T1"> </text:span><text:span text:style-name="T2">(46/19) </text:span> ⲕⲁ̣[ⲧⲁ ⲡⲓⲛⲉ ⲙ̅ⲡⲟ]ⲩⲡ̅ⲛ̅ⲁ̅· ⲁⲩⲱ <text:line-break/><text:span text:style-name="T1"> </text:span><text:span text:style-name="T2">(46/20) </text:span> ⲁ[ⲩⲧⲱⲙ ⲛ̅ⲛⲟⲩ]ϩⲏⲧ’ ⲁⲩⲱ ⲁⲩ‐ <text:line-break/><text:span text:style-name="T1"> </text:span><text:span text:style-name="T2">(46/21) </text:span> ϯ [ⲛ̅ϣⲟⲧ’ ⲛⲁⲩ] ⲉ̣ⲃⲟⲗ ϩⲙ̅ ⲡⲉⲛ‐ <text:line-break/><text:span text:style-name="T1"> </text:span><text:span text:style-name="T2">(46/22) </text:span> ϣ̣[ⲟⲧ’ ⲙ̅ⲡⲉⲡ̅ⲛ̅ⲁ̅ ⲉ]ⲧ’ϣⲏⲥ ϣⲁ‐ <text:line-break/><text:span text:style-name="T1"> </text:span><text:span text:style-name="T2">(46/23) </text:span> [ϩⲣⲁⲓ̈ ⲉⲧⲉⲛⲟⲩ· ⲁ̣[ⲛ]ⲟⲕ ϭⲉ ⲧⲉ <text:line-break/><text:span text:style-name="T1"> </text:span><text:span text:style-name="T2">(46/24) </text:span> [ⲡⲣⲟⲛⲟⲓⲁ ⲉⲧ’]ϫⲏⲕ̣ ⲉⲃⲟⲗ ⲛ̅ⲧⲉ <text:line-break/><text:span text:style-name="T1"> </text:span><text:span text:style-name="T2">(46/25) </text:span> [ⲡⲧⲏⲣϥ̅ ⲁⲓ̈ϣ]ⲃ̣̅ⲧϥ̅ ⲛ̅ϩⲣⲁⲓ̈ ϩⲙ̅ <text:line-break/><text:span text:style-name="T1"> </text:span><text:span text:style-name="T2">(46/26) </text:span> [ⲡⲁⲥⲡⲉⲣⲙⲁ· ⲛⲉⲓ̈]ϣⲟⲟⲡ’ ⲅⲁⲣ <text:line-break/><text:span text:style-name="T1"> </text:span><text:span text:style-name="T2">(46/27) </text:span> [ⲛ̅ϣⲟⲣⲡ̅’ ⲉⲓ̈ⲙⲟⲟ]ϣⲉ ϩⲛ̅ {ϩ̅ⲓ}ⲏ ⲛⲓⲙ <text:line-break/><text:span text:style-name="T1"> </text:span><text:span text:style-name="T2">(46/28) </text:span> [ⲙ̅ⲙⲟⲟϣⲉ ⲁⲛ]ⲟ̣ⲕ̣ ⲅ̣ⲁⲣ ⲧⲉ <text:line-break/><text:span text:style-name="T1"> </text:span><text:span text:style-name="T2">(46/29) </text:span> [ⲧⲙ̅ⲛ̅ⲧ̅’̅ⲣⲙ̅ⲙⲁⲟ ⲙ̅ⲡⲟⲩⲟ]ⲉⲓⲛ <text:line-break/><text:span text:style-name="T1"> </text:span><text:span text:style-name="T2">(47/1) </text:span> ⲁⲛⲟⲕ ⲡⲉ ⲡⲣ̅[ⲡⲙⲉⲉⲩ]ⲉ ⲙ̅ⲡ̅’̅ⲡⲗⲏ‐ <text:line-break/><text:span text:style-name="T1"> </text:span><text:span text:style-name="T2">(47/2) </text:span> ⲣⲱⲙⲁ· ⲉⲓ̈ⲙ[ⲟⲟϣⲉ ⲇ]ⲉ̣ ϩ̅ⲛ̅ ⲧⲙ̅ⲛ[ⲧ’̅]‐ <text:line-break/><text:span text:style-name="T1"> </text:span><text:span text:style-name="T2">(47/3) </text:span> ⲛⲟϭ ⲙ̅ⲡⲕ[ⲁⲕⲉ· ⲁⲩⲱ ⲁⲓ̈]ⲁ̣ⲛⲉⲭⲉ̣ <text:line-break/><text:span text:style-name="T1"> </text:span><text:span text:style-name="T2">(47/4) </text:span> ϣⲁⲛϯⲃⲱⲕ̣ [ⲉϩⲟⲩⲛ ⲉⲧ]ⲙ̣ⲏⲧⲉ̣ <text:line-break/><text:span text:style-name="T1"> </text:span><text:span text:style-name="T2">(47/5) </text:span> ⲙ̅ⲡⲉϣⲧⲉⲕⲟ· ⲁⲩ̣[ⲱ ⲛ̅ⲥ]ⲛ̅ⲧⲉ ⲙ̅‐ <text:line-break/><text:span text:style-name="T1"> </text:span><text:span text:style-name="T2">(47/6) </text:span> ⲡⲭⲁⲟⲥ ⲁⲩⲕⲓⲙ· ⲁ[ⲩⲱ ⲁⲛ]ⲟⲕ ⲁⲓ̈‐ <text:line-break/><text:span text:style-name="T1"> </text:span><text:span text:style-name="T2">(47/7) </text:span> ϩⲟⲡⲧ̅’ ⲉⲣⲟⲟⲩ ⲉⲧⲃ̣[ⲉ ⲧⲟⲩ]ⲕⲁϭⲓⲁ̣ <text:line-break/><text:span text:style-name="T1"> </text:span><text:span text:style-name="T2">(47/8) </text:span> ⲁⲩⲱ ⲙ̅ⲡⲟⲩⲥⲟⲩ̣[ⲱⲛⲧ̅’·] ⲡⲁⲗⲓⲛ̣ <text:line-break/><text:span text:style-name="T1"> </text:span><text:span text:style-name="T2">(47/9) </text:span> ⲁⲓ̈ⲛⲟⲟⲩϩⲧ̅’ ⲉϩ[ⲟⲩⲛ ⲙ̅ⲡⲙⲉϩ]ⲥⲉⲡ <text:line-break/><text:span text:style-name="T1"> </text:span><text:span text:style-name="T2">(47/10) </text:span> ⲥⲛⲁⲩ̣ ⲁ̣ⲩ̣ⲱ ⲁⲓ̈ⲙ̣[ⲟⲟϣⲉ ⲉⲃⲟⲗ ϩⲛ̅] <text:line-break/><text:soft-page-break/><text:span text:style-name="T1"> </text:span><text:span text:style-name="T2">(47/11) </text:span> ⲛⲁⲡⲟⲩⲟⲉⲓⲛ ⲉⲧ̣ⲉ̣ [ⲁⲛⲟⲕ ⲡⲉ ⲡⲣ̅]‐ <text:line-break/><text:span text:style-name="T1"> </text:span><text:span text:style-name="T2">(47/12) </text:span> ⲡⲙⲉⲉⲩⲉ ⲛ̅ⲧⲡⲣⲟⲛ[ⲟⲓⲁ ⲁⲓ̈ⲃⲱⲕ] <text:line-break/><text:span text:style-name="T1"> </text:span><text:span text:style-name="T2">(47/13) </text:span> ⲉϩⲟⲩⲛ ϩⲛ̅ ⲧⲙⲏⲧⲉ̣ [ⲙ̅ⲡⲕⲁⲕⲉ] <text:line-break/><text:span text:style-name="T1"> </text:span><text:span text:style-name="T2">(47/14) </text:span> ⲁⲩⲱ ⲡⲥⲁⲛϩⲟⲩⲛ [ⲛ̅ⲉⲙⲛ̅ⲧⲉ] <text:line-break/><text:span text:style-name="T1"> </text:span><text:span text:style-name="T2">(47/15) </text:span> ⲉⲓ̈ⲕⲱⲧ̣ⲉ ⲛ̅ⲥⲁ ⲧⲁⲟⲓⲕ̣[ⲟⲛⲟⲙⲓⲁ] <text:line-break/><text:span text:style-name="T1"> </text:span><text:span text:style-name="T2">(47/16) </text:span> ⲁⲩⲱ ⲧⲥⲛ̅ⲧⲉ ⲙ̅ⲡ̣[ⲭⲁⲟⲥ ⲁⲩ]ⲕⲓⲙ <text:line-break/><text:span text:style-name="T1"> </text:span><text:span text:style-name="T2">(47/17) </text:span> ϫⲉⲕⲁⲁⲥ ⲉⲩⲛ[ⲁϩⲉ ⲉϩⲣⲁⲓ̈ ⲉϫ]ⲛ̣̅ <text:line-break/><text:span text:style-name="T1"> </text:span><text:span text:style-name="T2">(47/18) </text:span> ⲛⲉⲧ’ϣⲟⲟⲡ’ ϩⲙ̅ [ⲡⲭⲁⲟⲥ· ⲁⲩⲱ] <text:line-break/><text:span text:style-name="T1"> </text:span><text:span text:style-name="T2">(47/19) </text:span> ⲛ̅ⲥⲉⲧⲉⲕⲟⲟⲩ· [ⲁⲩⲱ ⲟⲛ ⲁⲛⲟⲕ] <text:line-break/><text:span text:style-name="T1"> </text:span><text:span text:style-name="T2">(47/20) </text:span> ⲁⲓ̈ⲡⲱⲧ’ ⲉϩⲣⲁⲓ̈ ⲉⲧ̣[ⲁⲛⲟⲩⲛⲉ ⲛ̅]‐ <text:line-break/><text:span text:style-name="T1"> </text:span><text:span text:style-name="T2">(47/21) </text:span> ⲟⲩⲟⲉⲓⲛ ϫⲉⲕⲁⲁⲥ̣ ⲛ̅ⲛⲟ[ⲩⲧⲁⲕⲟ] <text:line-break/><text:span text:style-name="T1"> </text:span><text:span text:style-name="T2">(47/22) </text:span> ⲙ̅ⲙⲟⲟⲩ ϩ̣ⲁⲑⲏ ⲙ̅ⲡⲟⲩⲟⲉ̣[ⲓϣ] <text:line-break/><text:span text:style-name="T1"> </text:span><text:span text:style-name="T2">(47/23) </text:span> ⲉⲧⲓ ϩⲙ̅ ⲡⲙⲉϩϣⲟ[ⲙⲧ̅’ ⲛ̅ⲥⲟⲡ’] <text:line-break/><text:span text:style-name="T1"> </text:span><text:span text:style-name="T2">(47/24) </text:span> ⲁⲓ̈ⲙⲟⲟϣⲉ ⲉⲧⲉ ⲁ̣[ⲛⲟⲕ ⲡⲉ ⲡⲟⲩⲟ]‐ <text:line-break/><text:span text:style-name="T1"> </text:span><text:span text:style-name="T2">(47/25) </text:span> ⲉⲓⲛ ⲉⲧ’ϣⲟⲟⲡ’ [ϩⲙ̅ ⲡⲟⲩⲟⲉⲓⲛ] <text:line-break/><text:span text:style-name="T1"> </text:span><text:span text:style-name="T2">(47/26) </text:span> ⲁⲛⲟⲕ ⲡⲉ ⲡⲣ̅ⲡⲙ[ⲉⲉⲩⲉ ⲛ̅ⲧⲡⲣⲟ]‐ <text:line-break/><text:span text:style-name="T1"> </text:span><text:span text:style-name="T2">(47/27) </text:span> ⲛⲟⲓⲁ ϫⲉⲕⲁⲁⲥ ⲉⲓ̈ⲛ̣[ⲁⲃⲱⲕ ⲉϩⲟⲩⲛ] <text:line-break/><text:span text:style-name="T1"> </text:span><text:span text:style-name="T2">(47/28) </text:span> ⲉⲧⲙⲏⲧⲉ ⲙ̅ⲡⲕ[ⲁⲕⲉ ⲁⲩⲱ ⲡ]‐ <text:line-break/><text:span text:style-name="T1"> </text:span><text:span text:style-name="T2">(47/29) </text:span> ⲥⲁⲛϩⲟⲩⲛ ⲛ̅ⲉⲙ̣[ⲛ̅ⲧⲉ· ⲁⲓ̈]‐ <text:line-break/><text:span text:style-name="T1"> </text:span><text:span text:style-name="T2">(48/1) </text:span> ⲙⲟⲩϩ ⲙ̅ⲡ[ⲁϩⲟ ⲛ̅]ϩ̣[ⲣ]ⲁ̣ⲓ̈ ϩⲙ̅ ⲡⲟⲩⲟⲉⲓⲛ <text:line-break/><text:span text:style-name="T1"> </text:span><text:span text:style-name="T2">(48/2) </text:span> ⲛ̅ⲧⲥⲩⲛⲧⲉ̣[ⲗⲉⲓⲁ ⲙ̅ⲡ]ⲟⲩⲁⲓⲱⲛ <text:line-break/><text:span text:style-name="T1"> </text:span><text:span text:style-name="T2">(48/3) </text:span> ⲁⲩⲱ ⲁⲉⲓⲃⲱ̣[ⲕ ⲉϩⲟⲩ]ⲛ ⲉⲧⲙⲏⲧⲉ <text:line-break/><text:span text:style-name="T1"> </text:span><text:span text:style-name="T2">(48/4) </text:span> [ⲙ̅]ⲡⲉϣ̣[ⲧⲉⲕⲟ· ⲉⲧⲉ] ⲡ̣ⲁⲓ̈ ⲡⲉ ⲡⲉϣⲧⲉ‐ <text:line-break/><text:span text:style-name="T1"> </text:span><text:span text:style-name="T2">(48/5) </text:span> [ⲕ]ⲟ̣ ⲙ̅ⲡ[ⲥⲱⲙⲁ ⲁⲩ]ⲱ̣ ⲡⲉϫⲁⲓ̈ ϫⲉ ⲡⲉⲧ’‐ <text:line-break/><text:span text:style-name="T1"> </text:span><text:span text:style-name="T2">(48/6) </text:span> ⲥⲱⲧⲙ̅ [ⲧⲱⲟ]ⲩⲛ ⲉⲃⲟⲗ ϩⲙ̅ ⲫⲓⲛⲏⲃ <text:line-break/><text:span text:style-name="T1"> </text:span><text:span text:style-name="T2">(48/7) </text:span> ⲉⲧ’ϩⲟⲣ̣[ϣ̅· ⲁ]ⲩ̣ⲱ ⲁϥⲣⲓⲙⲉ ⲁⲩⲱ ⲁϥ‐ <text:line-break/><text:span text:style-name="T1"> </text:span><text:span text:style-name="T2">(48/8) </text:span> ϣ̣ⲟⲩⲉ [ⲣⲙ̅ⲉⲓ]ⲏ̣· ⲁⲩⲱ ϩⲉⲛⲣⲙ̅ⲉⲓⲏ <text:line-break/><text:span text:style-name="T1"> </text:span><text:span text:style-name="T2">(48/9) </text:span> ⲉ̣ⲩϩⲟ̣[ⲣϣ̅ ⲁϥϥ]ⲱ̣ⲧⲉ ⲙ̅ⲙⲟⲟⲩ ⲉⲃⲟⲗ <text:line-break/><text:span text:style-name="T1"> </text:span><text:span text:style-name="T2">(48/10) </text:span> ⲙ̅ⲙ̣[ⲟϥ· ⲁⲩⲱ ⲡ]ⲉϫⲁϥ ϫⲉ [ⲛⲓ]ⲙ ⲡⲉⲧ’‐ <text:line-break/><text:span text:style-name="T1"> </text:span><text:span text:style-name="T2">(48/11) </text:span> [ⲙⲟⲩⲧⲉ ⲙ̅ⲡ]ⲁⲣⲁⲛ· ⲁⲩⲱ ⲛ̅ⲧⲁⲥ{ⲉ̅ⲓ} <text:line-break/><text:span text:style-name="T1"> </text:span><text:span text:style-name="T2">(48/12) </text:span> [ⲛⲁⲓ̈ ⲧⲱⲛ ⲛ̅ϭⲓ] ⲧ̣ⲉⲓ̈ϩⲉⲗⲡⲓⲥ ⲉⲓ̈ϣⲟ‐ <text:line-break/><text:span text:style-name="T1"> </text:span><text:span text:style-name="T2">(48/13) </text:span> [ⲟⲡ’ ϩⲣⲁⲓ̈ ϩⲛ̅ ⲙ̅]ⲙ̅ⲣⲣⲉ ⲙ̅ⲡⲉϣⲧⲉⲕⲟ <text:line-break/><text:span text:style-name="T1"> </text:span><text:span text:style-name="T2">(48/14) </text:span> [ⲁⲩⲱ ⲡⲉϫⲁⲓ̈] ϫⲉ ⲁⲛⲟⲕ ⲡⲉ ⲧ’ⲡⲣⲟ‐ <text:line-break/><text:span text:style-name="T1"> </text:span><text:span text:style-name="T2">(48/15) </text:span> [ⲛⲟⲓⲁ ⲙ̅ⲡⲟⲩ]ⲟⲉⲓⲛ ⲉⲧ’[ⲧ]ⲃ̣̅ⲃⲏⲟⲩ <text:line-break/><text:span text:style-name="T1"> </text:span><text:span text:style-name="T2">(48/16) </text:span> ⲁⲛⲟ̣[ⲕ ⲡⲉ ⲡ]ⲙⲉⲉⲩⲉ ⲙ̅ⲡⲁⲣⲑⲉⲛⲓ‐ <text:line-break/><text:span text:style-name="T1"> </text:span><text:span text:style-name="T2">(48/17) </text:span> ⲕⲟ̣[ⲛ ⲙ̅ⲡ̅ⲛ̅ⲁ̅ ⲡⲉ]ⲧ’ⲥⲟϩⲉ ⲙ̅ⲙⲟⲕ <text:line-break/><text:span text:style-name="T1"> </text:span><text:span text:style-name="T2">(48/18) </text:span> ⲉ̣[ϩⲣⲁⲓ̈ ⲉⲡⲧⲟⲡⲟ]ⲥ̣ ⲉⲧ’ⲧⲁⲉⲓⲏⲟⲩ· <text:line-break/><text:span text:style-name="T1"> </text:span><text:span text:style-name="T2">(48/19) </text:span> [ⲧⲱⲟⲩⲛ]ⲕ̅ ⲁ[ⲩ]ⲱ ⲛ̅ⲕⲣ̅ⲡⲙⲉⲉⲩⲉ <text:line-break/><text:span text:style-name="T1"> </text:span><text:span text:style-name="T2">(48/20) </text:span> [ϫⲉ ⲛ̅ⲧⲟⲕ] ⲡ[ⲉ] ⲧⲁϩⲥⲱⲧⲙ̅· ⲁⲩⲱ <text:line-break/><text:span text:style-name="T1"> </text:span><text:span text:style-name="T2">(48/21) </text:span> [ⲛⲅ̅ⲟ]ⲩ̣ⲁϩⲕ̣̅ ⲉⲧⲉⲕⲛⲟⲩⲛⲉ ⲉⲧⲉ <text:line-break/><text:span text:style-name="T1"> </text:span><text:span text:style-name="T2">(48/22) </text:span> [ⲁⲛⲟⲕ] ⲡ̣ⲉ ⲡϣⲁⲛϩⲧ̣ⲏϥ ⲁⲩⲱ ⲛ̅‐ <text:line-break/><text:span text:style-name="T1"> </text:span><text:span text:style-name="T2">(48/23) </text:span> [ⲕⲣ̅ⲁⲥⲫⲁⲗ]ⲓ̣ⲍⲉ ⲙ̅ⲙⲟⲕ ⲉⲃⲟⲗ <text:line-break/><text:span text:style-name="T1"> </text:span><text:span text:style-name="T2">(48/24) </text:span> [{ϩ̅ⲓ}ⲧⲟⲟⲧⲟⲩ ⲛ̅]ⲛ̅ⲁⲅⲅⲉⲗⲟⲥ ⲛ̅ⲧⲙ̅ⲛⲧ’̅ ‐ <text:line-break/><text:span text:style-name="T1"> </text:span><text:span text:style-name="T2">(48/25) </text:span> [ϩⲏⲕⲉ ⲙⲛ̅ ⲛ̅ⲇ]ⲁⲓⲙⲱⲛ ⲛ̅ⲧⲉ ⲡⲭⲁ‐ <text:line-break/><text:span text:style-name="T1"> </text:span><text:span text:style-name="T2">(48/26) </text:span> [ⲟⲥ ⲙⲛ̅ ⲛⲉ]ⲧ’̣ϭⲟⲗϫ̅ ⲙ̅ⲙⲟⲕ <text:line-break/><text:span text:style-name="T1"> </text:span><text:span text:style-name="T2">(48/27) </text:span> [ⲧⲏⲣⲟⲩ· ⲁⲩ]ⲱ ⲛⲅ̅ϣⲱⲡⲉ ⲉⲕⲣⲟ‐ <text:line-break/><text:span text:style-name="T1"> </text:span><text:span text:style-name="T2">(48/28) </text:span> [ⲉⲓⲥ ⲉⲃⲟⲗ {ϩ̅ⲓ}ⲧⲛ̅] ⲫⲓⲛⲏⲃ ⲉⲧ’ϩⲟ‐ <text:line-break/><text:soft-page-break/><text:span text:style-name="T1"> </text:span><text:span text:style-name="T2">(48/29) </text:span> [ⲣϣ̅ ⲁⲩⲱ ⲉⲃ]ⲟⲗ ϩⲛ̅ ⲧϭⲁⲗⲉⲥ <text:line-break/><text:span text:style-name="T1"> </text:span><text:span text:style-name="T2">(49/1) </text:span> ⲉⲧⲛ̅ⲡⲥⲁ[ⲛϩⲟⲩⲛ ⲛ̅ⲉⲙⲛ̅ⲧⲉ ⲁⲩⲱ] <text:line-break/><text:span text:style-name="T1"> </text:span><text:span text:style-name="T2">(49/2) </text:span> ⲁⲉⲓⲧⲟⲩⲛⲟ̣[ⲥ ⲙ̅ⲙⲟϥ ⲁⲉⲓⲥⲫⲣⲁⲅⲓⲍⲉ] <text:line-break/><text:span text:style-name="T1"> </text:span><text:span text:style-name="T2">(49/3) </text:span> ⲙ̅ⲙⲟϥ ϩⲙ̅ ⲡ̣[ⲟⲩⲟⲉⲓⲛ ⲙ̅ⲡⲙⲟⲟⲩ ϩⲛ̅ <text:line-break/><text:span text:style-name="T1"> </text:span><text:span text:style-name="T2">(49/4) </text:span> ϯⲉ ⲛ̅ⲥⲫⲣ̣[ⲁⲅⲓⲥ ϫⲉⲕⲁⲁⲥ ⲛ̅ⲛⲉ] <text:line-break/><text:span text:style-name="T1"> </text:span><text:span text:style-name="T2">(49/5) </text:span> ⲡⲙⲟⲩ ϭⲙ̅ϭⲟⲙ ⲉ̣[ⲣⲟϥ ϫⲛ̅] ⲙ̣̅[ⲡⲓ‐ <text:line-break/><text:span text:style-name="T1"> </text:span><text:span text:style-name="T2">(49/6) </text:span> ⲛⲁⲩ· ⲁⲩⲱ ⲉⲓⲥϩⲏⲏ̣ⲧⲉ ⲧⲉⲛ[ⲟⲩ] <text:line-break/><text:span text:style-name="T1"> </text:span><text:span text:style-name="T2">(49/7) </text:span> ⲉⲓ̈ⲛⲁⲃⲱⲕ ⲉϩⲣⲁⲓ̈ ⲉⲡⲧⲉⲗⲓⲟⲥ ⲛ̅[ⲁⲓ]‐ <text:line-break/><text:span text:style-name="T1"> </text:span><text:span text:style-name="T2">(49/8) </text:span> ⲱⲛ· ⲁⲓ̈ϫⲱⲕ ⲛⲁⲕ ⲉⲃⲟⲗ ⲛ̅ϩⲱⲃ̣ [ⲛⲓⲙ] <text:line-break/><text:span text:style-name="T1"> </text:span><text:span text:style-name="T2">(49/9) </text:span> ⲛ̅ϩⲣⲁⲓ̈ ϩⲛ̅ ⲛⲉⲕⲙⲁⲁϫⲉ· ⲁⲛⲟⲕ̣ [ⲇⲉ] <text:line-break/><text:span text:style-name="T1"> </text:span><text:span text:style-name="T2">(49/10) </text:span> ⲁⲓ̈ϫⲉ ϩⲱⲃ ⲛⲓⲙ ⲉⲣⲟⲕ ϫⲉⲕⲁⲁⲥ̣ [ⲉⲕⲛⲁ] <text:line-break/><text:span text:style-name="T1"> </text:span><text:span text:style-name="T2">(49/11) </text:span> ⲥⲁϩⲟⲩ ⲛⲅ̅ⲧⲁⲁⲩ ⲛ̅ⲛⲉⲕϣ̅ⲃ̅[̅ⲣ̅ ⲡ̅ⲛⲁ̅] <text:line-break/><text:span text:style-name="T1"> </text:span><text:span text:style-name="T2">(49/12) </text:span> ϩⲛ̅ ⲟⲩϩⲱⲡ’· ⲡⲁⲓ̈ ⲅⲁⲣ ⲡⲉ ⲡ[ⲙⲩⲥⲧⲏ]‐ <text:line-break/><text:span text:style-name="T1"> </text:span><text:span text:style-name="T2">(49/13) </text:span> ⲣⲓⲟⲛ ⲛ̅ⲧⲅⲉⲛⲉⲁ ⲛ̅ⲁⲧ’ⲕ[ⲓⲙ· ⲁⲩⲱ] <text:line-break/><text:span text:style-name="T1"> </text:span><text:span text:style-name="T2">(49/14) </text:span> ⲁϥϯ ⲛ[ⲁ]ⲓ̈ ⲛⲁϥ ⲛ̅ϭⲓ ⲡⲥⲱⲧⲏⲣ ϫ[ⲉⲕⲁ]‐ <text:line-break/><text:span text:style-name="T1"> </text:span><text:span text:style-name="T2">(49/15) </text:span> ⲁⲥ ⲉϥⲛⲁⲥⲁϩⲟⲩ ⲁⲩⲱ ⲛϥ̅ⲕⲁ[ⲁⲩ ϩⲛ̅ <text:line-break/><text:span text:style-name="T1"> </text:span><text:span text:style-name="T2">(49/16) </text:span> ⲟⲩⲧⲁϫⲣⲟ· ⲁⲩⲱ ⲡⲉϫⲁϥ ⲛⲁϥ [ϫⲉ ϥ]‐ <text:line-break/><text:span text:style-name="T1"> </text:span><text:span text:style-name="T2">(49/17) </text:span> ⲥϩⲟⲩⲟⲣⲧ̅’ ⲛ̅ϭⲓ ⲟⲩⲟⲛ ⲛⲓⲙ [ⲉⲧⲛⲁϯ ⲛⲁⲓ̈] <text:line-break/><text:span text:style-name="T1"> </text:span><text:span text:style-name="T2">(49/18) </text:span> ϩⲁ ⲟⲩⲇⲱⲣⲟⲛ ⲏ%0 ⲉⲧⲃⲉ ⲟⲩ[ϭⲓ ⲛ̅ⲟⲩ]‐ <text:line-break/><text:span text:style-name="T1"> </text:span><text:span text:style-name="T2">(49/19) </text:span> ⲱⲙ· ⲏ%0 ⲉⲧⲃⲉ ⲟⲩⲥⲱ· ⲏ%0 ⲉ̣[ⲧⲃⲉ ⲟⲩ]‐ <text:line-break/><text:span text:style-name="T1"> </text:span><text:span text:style-name="T2">(49/20) </text:span> ϣⲧⲏⲛ ⲏ%0 ⲉⲧⲃⲉ ⲕⲉϩⲱⲃ [ⲛ̅ⲧⲉⲓ̈]ⲙ̣[ⲓⲛⲉ] <text:line-break/><text:span text:style-name="T1"> </text:span><text:span text:style-name="T2">(49/21) </text:span> ⲁⲩⲱ ⲛⲁⲓ̈ ⲁⲩⲧⲁⲁⲩ ⲛⲁϥ ϩⲛ̅ ⲟⲩ[ⲙⲩ]‐ <text:line-break/><text:span text:style-name="T1"> </text:span><text:span text:style-name="T2">(49/22) </text:span> ⲥⲧⲏⲣⲓⲟⲛ· ⲁⲩⲱ ⲛ̅ⲧⲉⲩⲛⲟⲩ [ⲁϥⲣ̅]‐ <text:line-break/><text:span text:style-name="T1"> </text:span><text:span text:style-name="T2">(49/23) </text:span> ⲁⲧⲟⲩⲱⲛϩ̅ ⲉⲃⲟⲗ ⲙ̅ⲡⲉϥⲙ̅ⲧ̣[ⲟ ⲉⲃⲟⲗ] <text:line-break/><text:span text:style-name="T1"> </text:span><text:span text:style-name="T2">(49/24) </text:span> ⲁⲩⲱ ⲁϥ{ⲉ̅ⲓ} ϣⲁ ⲛⲉϥϣ̅ⲃⲣ̅ ⲙⲁⲑ̣[ⲏⲧⲏⲥ] <text:line-break/><text:span text:style-name="T1"> </text:span><text:span text:style-name="T2">(49/25) </text:span> ⲁϥϫⲱ ⲉⲣⲟϥ ⲛ̅ⲛⲉⲛⲧⲁⲡⲥ̅ⲱ̣̅̅[̅ⲣ̅ ϫⲟ]‐ <text:line-break/><text:span text:style-name="T1"> </text:span><text:span text:style-name="T2">(49/26) </text:span> ⲟⲩ ⲉⲣⲟϥ ⲓ̅ⲥ̅ ⲡⲉⲭ̅ⲣⲥ̅ ϩⲁⲙⲏ[ⲛ] <text:line-break/><text:span text:style-name="T1"> </text:span><text:span text:style-name="T2">(49/27) </text:span> ⲕⲁⲧⲁ ⲓ̈ⲱ[ⲏ]ⲛ̣ ⲛ̣̅ <text:line-break/><text:span text:style-name="T1"> </text:span><text:span text:style-name="T2">(49/28) </text:span> ⲁⲡⲟⲕⲣⲩ̣ⲫⲟⲛ </text:p>
      <text:p text:style-name="P1"/>
      <text:p text:style-name="P3">( codex IV ) The Gospel of the Egyptians</text:p>
      <text:p text:style-name="P2"><text:span text:style-name="T1"> </text:span><text:span text:style-name="T2">(50/1) </text:span> [ⲡϫⲱⲱⲙⲉ ⲉⲧⲟⲩⲁ]ⲁ̣ⲃ ⲛ̅ⲧⲉ ⲛⲓ‐ <text:line-break/><text:span text:style-name="T1"> </text:span><text:span text:style-name="T2">(50/2) </text:span> [ⲣ̅ⲙ̅ⲛ̅ⲕⲏⲙⲉ ⲛ̅ⲧⲉ] ⲡ̣ⲓⲛⲟϭ ⲛ̅ⲛⲁ‐ <text:line-break/><text:span text:style-name="T1"> </text:span><text:span text:style-name="T2">(50/3) </text:span> [ⲧⲛⲁⲩ ⲉⲣⲟϥ ⲙ̅ⲡ̅ⲛ̅ⲁ̅] ⲡⲓⲱⲧ’ ⲛ̅ⲁⲧ’‐ <text:line-break/><text:span text:style-name="T1"> </text:span><text:span text:style-name="T2">(50/4) </text:span> [ϫⲱ ⲙ̅ⲡⲉϥⲣⲁⲛ ⲉⲧⲁ]ϥⲣ̅ϣⲟⲣ̅ⲡ̅’̅ ⲛ̅‐ <text:line-break/><text:span text:style-name="T1"> </text:span><text:span text:style-name="T2">(50/5) </text:span> [{ⲉ̅ⲓ} ⲉⲃⲟⲗ ϩ̅ⲛ̅ ⲛⲓ]ϫⲓⲥⲉ· ⲡⲟⲩⲟ‐ <text:line-break/><text:span text:style-name="T1"> </text:span><text:span text:style-name="T2">(50/6) </text:span> [ⲉⲓ]ⲛ ⲛ̅ⲧ̣ⲉ [ⲡⲓ]ϫ̣ⲱⲕ · ⲡⲟⲩⲟⲉⲓⲛ <text:line-break/><text:span text:style-name="T1"> </text:span><text:span text:style-name="T2">(50/7) </text:span> ϣⲁ ⲉⲛⲉϩ ⲛ̅ⲧⲉ ⲛⲓⲉⲛⲉϩ· ⲡⲟⲩⲟ‐ <text:line-break/><text:span text:style-name="T1"> </text:span><text:span text:style-name="T2">(50/8) </text:span> [ⲉ]ⲓ̣ⲛ ϩ̅ⲛ̅ ⲟⲩⲥⲓⲅⲏ ϩ̅ⲛ̅ ⲟⲩⲡⲣⲟⲛⲟⲓⲁ <text:line-break/><text:span text:style-name="T1"> </text:span><text:span text:style-name="T2">(50/9) </text:span> ⲙ̣̅̅ⲛ̅ ⲟⲩⲥⲓⲅⲏ ⲛ̅ⲧⲉ ⲡⲓⲱⲧ’ · ⲡⲟⲩⲟ‐ <text:line-break/><text:span text:style-name="T1"> </text:span><text:span text:style-name="T2">(50/10) </text:span> [ⲉⲓ]ⲛ ϩ̅ⲛ̅ ⲟⲩϣⲁϫⲉ ⲙⲛ̅ ⲟⲩⲙ̅ⲛ̣̅ⲧ̣ⲙⲉ · <text:line-break/><text:span text:style-name="T1"> </text:span><text:span text:style-name="T2">(50/11) </text:span> [ⲡⲟ]ⲩ̣ⲟⲉⲓⲛ ⲛ̅ⲛⲁⲧ’ϫⲱϩ̅ⲙ̅ ⲡⲟⲩⲟ‐ <text:line-break/><text:span text:style-name="T1"> </text:span><text:span text:style-name="T2">(50/12) </text:span> [ⲉⲓⲛ] ⲛ̅ⲛⲁⲧ’ϫⲓⲟⲟⲣ ⲙ̅ⲙⲟϥ · ⲡⲟⲩ‐ <text:line-break/><text:span text:style-name="T1"> </text:span><text:span text:style-name="T2">(50/13) </text:span> [ⲟⲉⲓ]ⲛ̣ ⲉⲧⲁϥⲣ̅ϣⲟⲣ̅ⲡ̅’̅ ⲛ̅{ⲉⲓ} ⲉⲃⲟⲗ ϣⲁ <text:line-break/><text:span text:style-name="T1"> </text:span><text:span text:style-name="T2">(50/14) </text:span> [ⲉⲛⲉϩ] ⲛ̅ⲧⲉ ⲛⲓⲉⲛⲉϩ ⲛ̅ⲧⲉ ⲡⲓⲱⲧ’ <text:line-break/><text:span text:style-name="T1"> </text:span><text:span text:style-name="T2">(50/15) </text:span> [ⲛ̅ⲛ]ⲁⲧ’ϣⲁϫⲉ ⲙ̅ⲙⲟϥ ⲁⲩ̣ⲱ ⲛ̅‐ <text:line-break/><text:span text:style-name="T1"> </text:span><text:span text:style-name="T2">(50/16) </text:span> [ⲛⲁⲧ’]ϯ ϣⲱⲗ̅ϩ̅ ⲉⲣⲟϥ ⲁⲩⲱ ⲛ̅ⲛⲁⲧ’‐ <text:line-break/><text:span text:style-name="T1"> </text:span><text:span text:style-name="T2">(50/17) </text:span> [ⲧⲁ]ϣⲉ ⲟⲉⲓϣ ⲙ̅ⲙⲟϥ ⲡⲉⲱⲛ ⲛ̅‐ <text:line-break/><text:span text:style-name="T1"> </text:span><text:span text:style-name="T2">(50/18) </text:span> [ⲧⲉ] ⲛ̣ⲉ̣ⲱⲛ · ⲡⲓϫⲡⲟ ⲉⲃⲟⲗ ⲙ̅ⲙⲟϥ <text:line-break/><text:span text:style-name="T1"> </text:span><text:span text:style-name="T2">(50/19) </text:span> [ⲙⲁⲩⲁ]ⲁϥ · ⲁⲩⲱ ⲡⲓⲡⲓⲣⲉ ⲉⲃⲟⲗ <text:line-break/><text:span text:style-name="T1"> </text:span><text:span text:style-name="T2">(50/20) </text:span> [ⲙ̅ⲙⲟϥ] ⲙⲁⲩⲁⲁϥ · ⲁⲩⲱ ⲙⲛ̅ ⲡⲓ‐ <text:line-break/><text:span text:style-name="T1"> </text:span><text:span text:style-name="T2">(50/21) </text:span> [ⲁⲗ]ⲗ̣ⲟ̣ⲅ̣ⲉⲛ̣ⲏⲥ ϯϭⲟⲙ ⲛ̅ⲛⲁⲧ̅ⲣ̅ϩⲉⲣ <text:line-break/><text:span text:style-name="T1"> </text:span><text:span text:style-name="T2">(50/22) </text:span> [ⲙ]ⲏ̣ⲛⲉⲩⲉ ⲙ̅ⲙⲟⲥ ⲛ̅ⲧⲉ ⲡⲓⲱⲧ’ <text:line-break/><text:span text:style-name="T1"> </text:span><text:span text:style-name="T2">(50/23) </text:span> [ⲛ̅ⲛ]ⲁⲧ’ϣⲁϫⲉ ⲙ̅ⲙⲟϥ · ⲁⲩ{ⲉ̅ⲓ} <text:line-break/><text:span text:style-name="T1"> </text:span><text:span text:style-name="T2">(50/24) </text:span> [ⲉⲃ]ⲟⲗ ⲙ̅ⲙⲟϥ ⲛ̅ϭⲓ ϣⲟⲙⲧⲉ ⲛ̅ϭⲟⲙ <text:line-break/><text:span text:style-name="T1"> </text:span><text:span text:style-name="T2">(50/25) </text:span> [ⲉ]ⲧⲉ ⲛⲁⲓ̈ ⲛⲉ· ⲡⲓⲱⲧ’ ⲧⲙⲁ‐ <text:line-break/><text:span text:style-name="T1"> </text:span><text:span text:style-name="T2">(50/26) </text:span> [ⲁⲩ] ⲡϣⲏⲣⲉ ⲛⲓⲡⲓⲣⲉ ⲉⲃⲟⲗ ⲙ̅‐ <text:line-break/><text:span text:style-name="T1"> </text:span><text:span text:style-name="T2">(50/27) </text:span> [ⲙⲟ]ⲟⲩ ⲙⲁⲩⲁⲁⲩ ⲉⲃⲟⲗ ϩ̅ⲛ̅ ⲟⲩ‐ <text:line-break/><text:span text:style-name="T1"> </text:span><text:span text:style-name="T2">(50/28) </text:span> [ⲥⲓⲅ]ⲏ ⲉⲥⲟⲛ̅[̅ϩ̅] ⲛ̣̅ⲧⲉ ⲡⲓⲱⲧ’ ⲛ̅ⲁⲧ’‐ <text:line-break/><text:span text:style-name="T1"> </text:span><text:span text:style-name="T2">(50/29) </text:span> [ϫ]ⲱ̣ϩ̅ⲙ̅ · ⲛⲁⲓ̈ [ⲁ]ⲩ̣ⲣ̅ϣⲟⲣ̅ⲡ’̅ ⲛ̅{ⲉⲓ} <text:line-break/><text:span text:style-name="T1"> </text:span><text:span text:style-name="T2">(51/1) </text:span> ⲉⲃⲟⲗ ϩ̅ⲛ̅ ⲟⲩⲥⲓ[ⲅⲏ ⲛ̅ⲧⲉ ⲡⲓⲱⲧ’ ⲛ̅ⲛⲁⲧ’]‐ <text:line-break/><text:span text:style-name="T1"> </text:span><text:span text:style-name="T2">(51/2) </text:span> ϣⲁϫⲉ ⲙ̅ⲙⲟ̣[ϥ...]. ⲛ̅ⲧ[....ⲇⲟ] <text:line-break/><text:span text:style-name="T1"> </text:span><text:span text:style-name="T2">(51/3) </text:span> ⲝⲟⲙⲉⲇⲱ̣[ⲛ.].[.ⲇⲟ]ⲙⲉⲇ̣[ⲱⲛ <text:line-break/><text:span text:style-name="T1"> </text:span><text:span text:style-name="T2">(51/4) </text:span> ⲡⲓⲉⲱⲛ ⲛ̅[ⲧⲉ] ⲛ̣ⲓⲉ̣[ⲱ]ⲛ· ⲡⲟ̣[ⲩⲟⲉⲓⲛ ⲁϥ] <text:line-break/><text:span text:style-name="T1"> </text:span><text:span text:style-name="T2">(51/5) </text:span> ⲣ̅ϣⲟⲣ̅ⲡ̅’̅ ⲛ̅{ⲉⲓ} ⲉⲃⲟⲗ ⲛ̅[ⲧⲉ ⲧⲟⲩ{ⲉⲓ} ⲧⲟⲩ] <text:line-break/><text:span text:style-name="T1"> </text:span><text:span text:style-name="T2">(51/6) </text:span> ⲡ̅ϣⲟⲣ̅ⲡ’ ⲛ̅{ⲉ̅ⲓ} ⲉⲃⲟ[ⲗ ⲙ̅]ⲙ̣ⲁ̣[ⲩ ⲉⲧⲉ ⲡⲁⲓ̈] <text:line-break/><text:span text:style-name="T1"> </text:span><text:span text:style-name="T2">(51/7) </text:span> {ⲉ̅ⲓ} ⲛ̅ⲧⲉ ⲛⲉⲩϭⲟⲙ · [ⲁⲩⲱ ⲛ̅ϯϩⲉ ⲡϣⲏ]‐ <text:line-break/><text:span text:style-name="T1"> </text:span><text:span text:style-name="T2">(51/8) </text:span> ⲣⲉ ⲁϥ{ⲉ̅ⲓ} ⲉⲃⲟⲗ ⲉⲡⲙⲉ[ϩϥⲧⲟⲟⲩ] <text:line-break/><text:span text:style-name="T1"> </text:span><text:span text:style-name="T2">(51/9) </text:span> ⲧⲙⲁⲁⲩ ⲇⲉ ⲉⲥⲉ ⲙ̅ⲙ[ⲉϩϯⲉ] <text:line-break/><text:span text:style-name="T1"> </text:span><text:span text:style-name="T2">(51/10) </text:span> ⲡⲓⲱⲧ’ ⲇⲉ ⲉ̣[ϥⲉ ⲙ̅ⲙⲉϩⲥⲟⲟⲩ] <text:line-break/><text:span text:style-name="T1"> </text:span><text:span text:style-name="T2">(51/11) </text:span> ϩ̅[̅.̅...]ⲁⲉ[ ⲁⲗⲗⲁ] <text:line-break/><text:span text:style-name="T1"> </text:span><text:span text:style-name="T2">(51/12) </text:span> [ⲟ]ⲩⲁⲧⲙⲁⲉⲓ̣[ⲛ ⲡⲉ ⲡⲁⲓ̈ ⲇⲉ ⲛⲉϥ]‐ <text:line-break/><text:span text:style-name="T1"> </text:span><text:span text:style-name="T2">(51/13) </text:span> ⲉ ⲙ̅ⲙⲁⲉⲓⲛ ⲁⲛ [ϩ̅ⲛ̅ ϩⲉ]ⲛ̣ϭ̣[ⲟⲙ] <text:line-break/><text:span text:style-name="T1"> </text:span><text:span text:style-name="T2">(51/14) </text:span> ⲧⲏⲣⲟⲩ · ϩⲉⲛⲉ̣[ⲟ]ⲟ̣ⲩ ⲛ̅ⲁ[ⲧ’ϫⲱ]‐ <text:line-break/><text:span text:style-name="T1"> </text:span><text:span text:style-name="T2">(51/15) </text:span> ϩ̅ⲙ̅ ⲉⲁⲩⲣ̅ϣⲟⲣ̅ⲡ’̅ ⲛ̅{ⲉⲓ} ⲉ̣[ⲃⲟⲗ] <text:line-break/><text:span text:style-name="T1"> </text:span><text:span text:style-name="T2">(51/16) </text:span> ⲙ̅ⲙⲟϥ ⲛ̅ϭⲓ ϣⲟⲙⲧⲉ ⲛ̅ϭ[ⲟⲙ ·] <text:line-break/><text:span text:style-name="T1"> </text:span><text:span text:style-name="T2">(51/17) </text:span> ⲉⲧⲉ ϣⲟⲙⲧⲉ ⲛⲉ ⲛ̅ⲟⲅ[ⲇⲟⲁⲥ] <text:line-break/><text:span text:style-name="T1"> </text:span><text:span text:style-name="T2">(51/18) </text:span> ⲛⲁⲓ̈ ⲛ̅ⲧⲁⲡⲓⲱⲧ’ ⲛ̅ⲧⲟ̣[ⲩ ⲉⲃⲟⲗ] <text:line-break/><text:soft-page-break/><text:span text:style-name="T1"> </text:span><text:span text:style-name="T2">(51/19) </text:span> ϩ̅ⲛ̅ ⲕⲟⲩⲛ̅ϥ̅ ϩ̅ⲛ̅ ⲟⲩⲥ̣ⲓ̣ⲅ̣ⲏ̣ [ⲙⲛ̅] <text:line-break/><text:span text:style-name="T1"> </text:span><text:span text:style-name="T2">(51/20) </text:span> ⲟⲩⲡⲣⲟⲛⲟⲓⲁ · ⲉⲧⲉ ⲛⲁ̣[ⲓ̈ ⲛⲉ]‐ <text:line-break/><text:span text:style-name="T1"> </text:span><text:span text:style-name="T2">(51/21) </text:span> ⲡⲓⲱⲧ’ ⲧⲙⲁⲁⲩ [ⲡϣⲏ]‐ <text:line-break/><text:span text:style-name="T1"> </text:span><text:span text:style-name="T2">(51/22) </text:span> ⲣⲉ · ϯϣⲟⲣ̅ⲡ̅’̅ ⲛ̅ⲟⲅⲇⲟⲁⲥ ⲧ̣[ⲏ]‐ <text:line-break/><text:span text:style-name="T1"> </text:span><text:span text:style-name="T2">(51/23) </text:span> ⲉⲧⲁⲡⲓϣ̅ⲙ̅ⲧ̅’̅ ϩⲟⲟⲩⲧ’ ⲛ̅ⲁⲗⲟ[ⲩ]‐ <text:line-break/><text:span text:style-name="T1"> </text:span><text:span text:style-name="T2">(51/24) </text:span> {ⲉ̅ⲓ} ⲉⲃⲟⲗ ⲉⲧⲃⲏⲏⲧ̅ⲥ̅ ⲉ[ⲧⲉ ⲧⲁⲓ̈] <text:line-break/><text:span text:style-name="T1"> </text:span><text:span text:style-name="T2">(51/25) </text:span> ⲧⲉ ϯⲉⲛⲛⲟⲓⲁ ⲙⲛ̣̅ ⲡⲓϣⲁ[ϫⲉ ⲙⲛ̅] <text:line-break/><text:span text:style-name="T1"> </text:span><text:span text:style-name="T2">(51/26) </text:span> ⲡⲓⲱⲛ̅ϩ̅ ⲛ̅ⲛⲁ[ⲧ’]ϫⲱϩ̅ⲙ̅ ϣ̣[ⲁ ⲉ]‐ <text:line-break/><text:span text:style-name="T1"> </text:span><text:span text:style-name="T2">(51/27) </text:span> ⲛⲉϩ · ⲟⲩⲱϣ̣· ⲟⲩⲛⲟⲩ[ⲥ·] <text:line-break/><text:span text:style-name="T1"> </text:span><text:span text:style-name="T2">(52/1) </text:span> [ⲙ̅ⲛ̅ ⲟⲩϭⲓⲛⲣ̅ϣⲟ]ⲣ̣̅ⲡ’̅ ⲛ̅ⲥⲟⲟⲩⲛ <text:line-break/><text:span text:style-name="T1"> </text:span><text:span text:style-name="T2">(52/2) </text:span> [ⲡⲓⲱ]ⲧ’̣ ⲛ̅ϩ[ⲟⲟⲩⲧ’ ⲥ]{ϩ̅ⲓ}ⲙⲉ ϯϭⲟⲙ <text:line-break/><text:span text:style-name="T1"> </text:span><text:span text:style-name="T2">(52/3) </text:span> [ⲙ̅ⲙ]ⲉϩⲥ̅ⲛ̅[ⲧⲉ] ⲉ̣[ⲩⲟ]ⲅ̣ⲇⲟⲁⲥ ⲧⲉ <text:line-break/><text:span text:style-name="T1"> </text:span><text:span text:style-name="T2">(52/4) </text:span> [ⲧⲙⲁ]ⲁⲩ ϯ[ⲃⲁⲣ]ⲃⲏ̣[ⲗ]ⲱ ⲙ̅ⲡⲁⲣⲑⲉⲛⲟⲥ <text:line-break/><text:span text:style-name="T1"> </text:span><text:span text:style-name="T2">(52/5) </text:span> [ⲛ̅ϩⲟ]ⲟ̣ⲩ[ⲧ’ ..].ⲕⲁⲃⲁ · ⲁⲇⲱⲛⲉ· <text:line-break/><text:span text:style-name="T1"> </text:span><text:span text:style-name="T2">(52/6) </text:span> [ ] ⲡⲏ ⲉⲧ’ⲕⲏ {ϩ̅ⲓ}ϫ̅ⲛ̅ ⲧⲡ̣ⲉ <text:line-break/><text:span text:style-name="T1"> </text:span><text:span text:style-name="T2">(52/7) </text:span> [ ].[.]ⲁⲕⲣⲱⲃⲱⲣⲓⲁⲱⲣ <text:line-break/><text:span text:style-name="T1"> </text:span><text:span text:style-name="T2">(52/8) </text:span> [...]. ϯϭ̣ⲟⲙ ⲛ̅ⲛⲁⲧⲣϩ̅ⲉ̅ⲣ̣ⲙⲏ <text:line-break/><text:span text:style-name="T1"> </text:span><text:span text:style-name="T2">(52/9) </text:span> [ⲛⲉⲩⲉ] ⲙ̣̅ⲙ̣ⲟ̣[ⲥ ] ⲁⲩⲱ ⲛ̅ⲛⲁ̣ⲧ’‐ <text:line-break/><text:span text:style-name="T1"> </text:span><text:span text:style-name="T2">(52/10) </text:span> [ϣⲁϫⲉ ⲙ̅ⲙⲟⲥ] ⲧⲁⲓ̈ .ⲣ̣̅ⲙ.[ <text:line-break/><text:span text:style-name="T1"> </text:span><text:span text:style-name="T2">(52/11) </text:span> [ ]ⲕ ⲁ[ⲥⲡⲓ]ⲣ̣[ⲉ] <text:line-break/><text:span text:style-name="T1"> </text:span><text:span text:style-name="T2">(52/12) </text:span> [ⲉⲃⲟⲗ ⲙ̅ⲙⲟⲥ ⲙⲁ]ⲩ̣ⲁⲁⲥ ⲉⲁⲥ <text:line-break/><text:span text:style-name="T1"> </text:span><text:span text:style-name="T2">(52/13) </text:span> [ⲣ̅ϣⲟⲣ̅ⲡ̅’̅ ⲛ̅{ⲉⲓ} ⲉ]ⲃⲟⲗ · ⲁⲥϯ ⲙⲉⲧⲉ <text:line-break/><text:span text:style-name="T1"> </text:span><text:span text:style-name="T2">(52/14) </text:span> [ⲙ̅ⲛ̅] ⲡⲓⲱⲧ’̣ [ⲛ̅]ⲧⲉ ϯⲥⲓⲅⲏ ⲉⲧⲟⲛ̣̅ϩ̣̅ <text:line-break/><text:span text:style-name="T1"> </text:span><text:span text:style-name="T2">(52/15) </text:span> [ϯ〈ⲙⲉϩ〉ϣ]ⲟⲙⲧⲉ ⲇⲉ ⲛ̅ϭⲟⲙ ⲉⲩⲟⲅⲇ[ⲟⲁⲥ] <text:line-break/><text:span text:style-name="T1"> </text:span><text:span text:style-name="T2">(52/16) </text:span> [ⲧⲉ] ⲡ̣[ⲓ]ϣⲏⲣⲉ ⲛ̅ⲧⲉ ϯⲥⲓⲅⲏ ⲙ̅ⲛ̅ <text:line-break/><text:span text:style-name="T1"> </text:span><text:span text:style-name="T2">(52/17) </text:span> [ⲟⲩⲕⲁⲣ]ⲱϥ · ⲙ̅ⲛ̅ ⲟⲩⲥⲟⲟⲩⲛ ⲛ̣̅‐ <text:line-break/><text:span text:style-name="T1"> </text:span><text:span text:style-name="T2">(52/18) </text:span> [ⲧⲉ ⲡⲓⲱ]ⲧ’̣ ⲙ̅ⲛ̅ ⲟⲩⲁⲣⲉⲧⲏ ⲛ̅ⲧⲉ̣‐ <text:line-break/><text:span text:style-name="T1"> </text:span><text:span text:style-name="T2">(52/19) </text:span> [ⲧⲙ]ⲁⲁⲩ· ⲡⲁⲓ̈ ⲉⲁϥⲣ̅ϣⲟⲣ̅ⲡ̅’̅ ⲛ̣̅‐ <text:line-break/><text:span text:style-name="T1"> </text:span><text:span text:style-name="T2">(52/20) </text:span> [ⲉⲓⲛⲉ ⲉ]ⲃ̣ⲟ̣ⲗ̣ ϩ̅ⲛ̣̅̅ ⲕⲟⲩⲛ̅ϥ̅ ⲛ̅ⲥⲁϣϥⲉ̣ <text:line-break/><text:span text:style-name="T1"> </text:span><text:span text:style-name="T2">(52/21) </text:span> [ⲛ̅ϭ]ⲟ̣ⲙ ⲛ̅ⲧ̣ⲉ ⲡⲓⲛⲟϭ ⲛ̅ⲟⲩⲟⲉⲓⲛ <text:line-break/><text:span text:style-name="T1"> </text:span><text:span text:style-name="T2">(52/22) </text:span> [ⲛ̅]ⲧⲉ ϯⲥⲁϣϥⲉ ⲛ̅ⲥⲙⲏ ⲉⲧ[ⲉⲩ] <text:line-break/><text:span text:style-name="T1"> </text:span><text:span text:style-name="T2">(52/23) </text:span> [ⲉⲃ]ⲟⲗ ⲙ̅ⲙⲟ̣ⲟⲩ ⲡⲉ ⲡϣⲁϫⲉ <text:line-break/><text:span text:style-name="T1"> </text:span><text:span text:style-name="T2">(52/24) </text:span> [ⲛ̅ⲧⲉ] ⲡⲉⲩⲡⲗⲏⲣⲱⲙⲁ · ⲉⲧⲉ <text:line-break/><text:span text:style-name="T1"> </text:span><text:span text:style-name="T2">(52/25) </text:span> [ⲛⲁⲓ̈] ⲛ̣ⲉ ϣⲟⲙ̣ⲧ̣ⲉ ⲛ̅ϭⲟⲙ · ⲉⲧⲉ <text:line-break/><text:span text:style-name="T1"> </text:span><text:span text:style-name="T2">(52/26) </text:span> [ϣⲟ]ⲙⲧⲉ ⲛ̅ⲟ̣[ⲅ]ⲇⲟⲁⲥ ⲛⲉ ⲛⲁ[ⲓ̈] <text:line-break/><text:span text:style-name="T1"> </text:span><text:span text:style-name="T2">(53/1) </text:span> ⲛ̅ⲧⲁⲡⲓⲱⲧ’ [ⲛ̅ⲧⲟⲩ ⲉⲃⲟⲗ ϩ̅ⲛ̅ ⲕⲟⲩ]‐ <text:line-break/><text:span text:style-name="T1"> </text:span><text:span text:style-name="T2">(53/2) </text:span> ⲛ̅ϥ̅ ϩ̅ⲛ̅ ⲟⲩⲥⲓ̣[ⲅⲏ ⲙ̅ⲛ̅ ⲟ]ⲩⲡⲣ̣[ⲟⲛⲟⲓⲁ] <text:line-break/><text:span text:style-name="T1"> </text:span><text:span text:style-name="T2">(53/3) </text:span> ⲛ̅ⲧⲁϥ ⲙ̅ⲡⲓ̣[ⲙⲁ ⲉⲧ̅ⲙ̅ⲙ]ⲁ̣ⲩ · ⲡ[ⲓⲙⲁ] <text:line-break/><text:span text:style-name="T1"> </text:span><text:span text:style-name="T2">(53/4) </text:span> ⲉⲧⲁϥⲣ̅ϣⲟ̣ⲣ̣̅̅[̅ⲡ̅’̅] ⲛ̅[ⲟⲩ]ⲱⲛ̅ϩ̅ ⲉ̣[ⲃⲟⲗ] <text:line-break/><text:span text:style-name="T1"> </text:span><text:span text:style-name="T2">(53/5) </text:span> ⲙ̅ⲙⲁⲩ ⲛ̅ϭⲓ ⲇⲟⲝ̣[ⲟⲙ]ⲉ̣ⲇ̣[ⲱⲛ ⲡⲓⲉ]‐ <text:line-break/><text:span text:style-name="T1"> </text:span><text:span text:style-name="T2">(53/6) </text:span> ⲱⲛ ⲛ̅ⲧⲉ ⲛⲓⲉⲱⲛ [ⲙ̅ⲛ̅ ⲛⲓⲑⲣⲟⲛⲟⲥ] <text:line-break/><text:span text:style-name="T1"> </text:span><text:span text:style-name="T2">(53/7) </text:span> ⲉⲧ̅ⲛ̅ϩⲣⲁⲓ̈ ⲛ̅ϩⲏⲧ̅ϥ̣̅ [ⲙ̅ⲛ̅ ⲛⲓϭⲟⲙ ⲉⲧ’]‐ <text:line-break/><text:span text:style-name="T1"> </text:span><text:span text:style-name="T2">(53/8) </text:span> [ⲕ]ⲱ̣ⲧⲉ ⲉⲣⲟⲟⲩ ⲙ̣̅̅[̅ⲛ̅ ⲟⲩⲉⲟⲟⲩ] <text:line-break/><text:span text:style-name="T1"> </text:span><text:span text:style-name="T2">(53/9) </text:span> [ⲙ̅]̅ⲛ̣̅̅ ⲟⲩⲙ̅ⲛⲧ’̅ⲁⲧ’̣[ϫⲱϩ̅ⲙ̅ · ⲡⲓⲱⲧ’] <text:line-break/><text:span text:style-name="T1"> </text:span><text:span text:style-name="T2">(53/10) </text:span> [ⲛ̅ⲧ]ⲉ ⲡⲓⲛⲟϭ̣ [ⲛ̅ⲟⲩⲟⲉⲓⲛ ⲁϥ{ⲉ̅ⲓ}] <text:line-break/><text:span text:style-name="T1"> </text:span><text:span text:style-name="T2">(53/11) </text:span> [ⲉⲃⲟⲗ] ϩ̣̅̅ⲛ̅ ⲟⲩⲙ[ <text:line-break/><text:span text:style-name="T1"> </text:span><text:span text:style-name="T2">(53/12) </text:span> [ ]..[.....ⲡⲓⲛⲟϭ ⲛ̅ⲇⲟ]‐ <text:line-break/><text:soft-page-break/><text:span text:style-name="T1"> </text:span><text:span text:style-name="T2">(53/13) </text:span> [ⲝⲟ]ⲙ̣ⲉⲇⲱⲛ [ⲛ̅ⲛⲉⲱⲛ ⲉⲧ̅ϥ̅ⲙⲟⲧ̅ⲛ̅] <text:line-break/><text:span text:style-name="T1"> </text:span><text:span text:style-name="T2">(53/14) </text:span> [ⲙ̅]ⲙⲟϥ ⲛ̅ϩⲏⲧ̅ϥ̅ ⲛ̣̅[ϭⲓ ⲡⲓϣ̅ⲙⲧ’̅ ϩⲟ]‐ <text:line-break/><text:span text:style-name="T1"> </text:span><text:span text:style-name="T2">(53/15) </text:span> [ⲟ]ⲩⲧ’ ⲛ̅ⲁⲗⲟⲩ [ⲁⲩⲱ ⲁϥⲧⲁϫⲣⲟ] <text:line-break/><text:span text:style-name="T1"> </text:span><text:span text:style-name="T2">(53/16) </text:span> [ⲛ̅ϩ]ⲣ̣ⲁⲓ̈ ⲛ̅ϩⲏⲧ̅ϥ̅ ⲛ̅ϭⲓ ⲡ̣[ⲓⲑⲣⲟⲛⲟⲥ] <text:line-break/><text:span text:style-name="T1"> </text:span><text:span text:style-name="T2">(53/17) </text:span> [ⲛ̅]ⲧ̣ⲉ ⲡⲉϥⲉⲟⲟⲩ ⲡ̣[ⲏ ⲉⲧⲁⲩⲥϩⲁⲓ̈] <text:line-break/><text:span text:style-name="T1"> </text:span><text:span text:style-name="T2">(53/18) </text:span> [ⲛ̅ϩⲣ]ⲁⲓ̈ ⲛ̅ϩⲏⲧ̅ϥ̅ [ⲙ̅ⲡⲉϥⲣⲁⲛ ⲉⲧⲉ] <text:line-break/><text:span text:style-name="T1"> </text:span><text:span text:style-name="T2">(53/19) </text:span> [ⲙⲉ]ⲩϫⲟⲟϥ ϩ̅ⲛ̅ ϯ̣[ⲡⲩⲝⲟⲥ <text:line-break/><text:span text:style-name="T1"> </text:span><text:span text:style-name="T2">(53/20) </text:span> [..].ⲱⲛ ⲉⲧⲉ ⲡ̣[ⲁⲓ̈ ⲡⲉ ⲡϣⲁϫⲉ] <text:line-break/><text:span text:style-name="T1"> </text:span><text:span text:style-name="T2">(53/21) </text:span> [ⲛ̅ⲧ]ⲉ ⲡⲓⲱⲧ’ ⲁⲩ̣[ⲱ ⲡⲟⲩⲟⲉⲓⲛ] <text:line-break/><text:span text:style-name="T1"> </text:span><text:span text:style-name="T2">(53/22) </text:span> [ⲛ̅ⲧ]ⲉ ⲛⲁⲓ̈ ⲧⲏⲣⲟ[ⲩ ⲡⲁⲓ̈ ⲉⲧⲉⲃⲟⲗ] <text:line-break/><text:span text:style-name="T1"> </text:span><text:span text:style-name="T2">(53/23) </text:span> [ϩ̅ⲛ̅] ⲟⲩⲥⲓⲅⲏ · ⲁⲩ[ⲱ ⲡⲁⲓ̈ ⲉⲧⲁϥ] <text:line-break/><text:span text:style-name="T1"> </text:span><text:span text:style-name="T2">(53/24) </text:span> [ⲣ̅]ϣ̣ⲟⲣ̅ⲡ̅’̅ ⲛ̅{ⲉⲓ} ⲉⲃ[ⲟⲗ ϩ̅ⲛ̅ ⲟⲩⲥⲓ]‐ <text:line-break/><text:span text:style-name="T1"> </text:span><text:span text:style-name="T2">(53/25) </text:span> [ⲅⲏ] ⲡⲁⲓ̈ ⲉⲧ’ⲙⲟ̣[ⲧ̅ⲛ̅ ⲙ̅ⲙⲟϥ ϩ̅ⲛ̅] <text:line-break/><text:span text:style-name="T1"> </text:span><text:span text:style-name="T2">(53/26) </text:span> [ⲟⲩⲥ]ⲓ̣ⲅⲏ ⲡⲁⲓ̈ ⲉ[ⲧⲉ ⲡⲉϥⲣⲁⲛ] <text:line-break/><text:span text:style-name="T1"> </text:span><text:span text:style-name="T2">(53/27) </text:span> [ϩ̅ⲛ̅ ⲟ]ⲩⲥⲩⲙⲃ̣[ⲟⲗⲟⲛ ⲉϥⲉ ⲛ̅ⲁ]‐ <text:line-break/><text:span text:style-name="T1"> </text:span><text:span text:style-name="T2">(53/28) </text:span> [ⲧⲛ]ⲁⲩ ⲉⲣⲟϥ [ <text:line-break/><text:span text:style-name="T1"> </text:span><text:span text:style-name="T2">(54/1) </text:span> [......ⲁϥⲣ̅ϣ]ⲟⲣ̅ⲡ̅’̅ ⲛ̅{ⲉⲓ} ⲉⲃⲟⲗ <text:line-break/><text:span text:style-name="T1"> </text:span><text:span text:style-name="T2">(54/2) </text:span> [ⲛ̅ϭⲓ ⲟⲩ]ⲙⲩ[ⲥⲧⲏⲣⲓⲟ]ⲛ ⲛ̅ⲛⲁⲧ’ϣⲁ‐ <text:line-break/><text:span text:style-name="T1"> </text:span><text:span text:style-name="T2">(54/3) </text:span> [ϫⲉ] ⲙ̣̅ⲙⲟ[ϥ · ⲓⲓⲓⲓⲓ]ⲓ̣ⲓⲓⲓⲓⲓⲓⲓⲓⲓⲓ <text:line-break/><text:span text:style-name="T1"> </text:span><text:span text:style-name="T2">(54/4) </text:span> [ⲓⲓⲓⲓⲓⲓ] ⲏⲏⲏ[ⲏ]ⲏ̣ⲏ[ⲏ]ⲏⲏⲏⲏⲏⲏⲏ <text:line-break/><text:span text:style-name="T1"> </text:span><text:span text:style-name="T2">(54/5) </text:span> [ⲏⲏⲏ]ⲏⲏ̣[ⲏⲏ]ⲏ̣ ⲟⲟⲟⲟⲟⲟⲟⲟⲟ <text:line-break/><text:span text:style-name="T1"> </text:span><text:span text:style-name="T2">(54/6) </text:span> [ⲟⲟⲟⲟⲟⲟⲟ]ⲟ̣ⲟⲟⲟⲟⲟ ⲩⲩⲩ̣ <text:line-break/><text:span text:style-name="T1"> </text:span><text:span text:style-name="T2">(54/7) </text:span> [ⲩⲩⲩⲩⲩ]ⲩ̣ⲩⲩⲩⲩⲩ[ⲩ] <text:line-break/><text:span text:style-name="T1"> </text:span><text:span text:style-name="T2">(54/8) </text:span> [ⲩⲩⲩⲩⲩⲩ]ⲩ ⲉⲉⲉⲉⲉ[ⲉⲉ] <text:line-break/><text:span text:style-name="T1"> </text:span><text:span text:style-name="T2">(54/9) </text:span> [ⲉⲉⲉⲉⲉⲉⲉ]ⲉ̣ⲉⲉⲉⲉⲉ̣[ⲉⲉ] <text:line-break/><text:span text:style-name="T1"> </text:span><text:span text:style-name="T2">(54/10) </text:span> [ⲁⲁⲁⲁⲁⲁⲁⲁⲁ]ⲁ̣ⲁⲁⲁ[ⲁⲁ] <text:line-break/><text:span text:style-name="T1"> </text:span><text:span text:style-name="T2">(54/11) </text:span> [ⲁⲁⲁⲁⲁⲁⲁ ⲱ ⲱ] ⲱ̣ [ⲱ ⲱ] <text:line-break/><text:span text:style-name="T1"> </text:span><text:span text:style-name="T2">(54/12) </text:span> [ⲱ ⲱ ⲱ ⲱ ⲱ ⲱ] ⲱ ⲱ ⲱ ⲱ̣[ⲱ] <text:line-break/><text:span text:style-name="T1"> </text:span><text:span text:style-name="T2">(54/13) </text:span> [ⲱ ⲱ ⲱ ⲱ ⲱ ⲱ·] ⲁⲩⲱ ⲛ̅ϯϩⲉ̣ <text:line-break/><text:span text:style-name="T1"> </text:span><text:span text:style-name="T2">(54/14) </text:span> [ϯϣⲟⲙⲧ]ⲉ̣ ⲛ̣̅ϭⲟⲙ ⲁⲩⲉⲓⲛ̣[ⲉ] <text:line-break/><text:span text:style-name="T1"> </text:span><text:span text:style-name="T2">(54/15) </text:span> [ⲉϩⲣⲁⲓ̈ ⲛ̅ⲟⲩ]ⲥ̣ⲙⲟⲩ ⲙ̅ⲡⲓⲛⲟϭ ⲛ̅‐ <text:line-break/><text:span text:style-name="T1"> </text:span><text:span text:style-name="T2">(54/16) </text:span> [ⲛⲁⲧⲛⲁⲩ ⲉⲣ]ⲟϥ ⲁⲩⲱ ⲛ̅ⲁⲧ’ϫ[ⲁϩ]‐ <text:line-break/><text:span text:style-name="T1"> </text:span><text:span text:style-name="T2">(54/17) </text:span> [ⲙϥ̅ ⲛ̅ⲛⲁⲧ’ϯ ⲣⲁ]ⲛ ⲉⲣⲟϥ ⲡⲓ[ⲡⲁ]‐ <text:line-break/><text:span text:style-name="T1"> </text:span><text:span text:style-name="T2">(54/18) </text:span> [ⲣⲑⲉⲛⲓⲕⲟⲛ ⲙ̅]ⲡ̣̅̅ⲛ̅ⲁ̅ ⲛ̅ⲧⲉ ⲡ[ⲓⲱⲧ’] <text:line-break/><text:span text:style-name="T1"> </text:span><text:span text:style-name="T2">(54/19) </text:span> [ⲁⲩⲱ ϯϩⲟⲟⲩⲧ’] ⲙ̅ⲡⲁⲣⲑⲉⲛ̣[ⲟⲥ] <text:line-break/><text:span text:style-name="T1"> </text:span><text:span text:style-name="T2">(54/20) </text:span> [ϯⲃⲁⲣⲃⲏⲗⲱ] ⲁ〈ⲩ〉ⲣ̅ⲁⲓⲧⲓ ⲛ̅[ϣⲟ]‐ <text:line-break/><text:span text:style-name="T1"> </text:span><text:span text:style-name="T2">(54/21) </text:span> [ⲣⲡ̅’ ⲛ̅ⲛⲟⲩϭⲟⲙ] ⲁⲥⲣ̅ϣ̅ⲣ̅ⲡ̅’̅ ⲛ̣̅‐ <text:line-break/><text:span text:style-name="T1"> </text:span><text:span text:style-name="T2">(54/22) </text:span> [ⲟⲩⲱⲛ̅ϩ̅ ⲉⲃⲟ]ⲗ̣ ⲛ̅ϭⲓ ⲟⲩⲥ[ⲓⲅⲏ] <text:line-break/><text:span text:style-name="T1"> </text:span><text:span text:style-name="T2">(54/23) </text:span> [ⲉⲥⲟⲛ̅ϩ̅ ⲛ̅ⲥⲓ]ⲅ̣ⲏ̣ ϩ̅ⲛ̅ ⲟⲩϭⲟⲙ <text:line-break/><text:span text:style-name="T1"> </text:span><text:span text:style-name="T2">(54/24) </text:span> [ⲛⲁⲓ̈ ⲉⲧⲉ ϩⲉⲛⲉⲟ]ⲟⲩ ⲛⲉ ⲙⲛ̣̅ <text:line-break/><text:span text:style-name="T1"> </text:span><text:span text:style-name="T2">(54/25) </text:span> [ϩⲉⲛⲁⲧ’ϫⲱϩ̅ⲙ̅] ⲡ̣ⲓⲉⲱⲛ ⲉⲧ’̣ <text:line-break/><text:span text:style-name="T1"> </text:span><text:span text:style-name="T2">(54/26) </text:span> [ ⲛ̅ⲧ]ⲉ ⲛⲉⲱⲛ · <text:line-break/><text:span text:style-name="T1"> </text:span><text:span text:style-name="T2">(55/1) </text:span> ⲡⲏ ⲉⲧⲕⲏ ⲉ[ϩⲣⲁⲓ̈ ⲉϫ̅ⲛ̅ ⲛⲓⲙⲩⲥⲧⲏ]‐ <text:line-break/><text:span text:style-name="T1"> </text:span><text:span text:style-name="T2">(55/2) </text:span> ⲣⲓⲟⲛ ⲛⲁⲓ̈ ⲉ[ⲧⲉ ϩⲉⲛⲁⲛⲧⲃⲁ ⲛⲉ] <text:line-break/><text:span text:style-name="T1"> </text:span><text:span text:style-name="T2">(55/3) </text:span> ⲛⲓϣ̅ⲙ̅ⲧ̅’̅ ϩ[ⲟⲟ]ⲩ̣[ⲧ’· ⲛⲓ]ϣ̅ⲙ[̅ⲧ’ ⲅⲉ]‐ <text:line-break/><text:span text:style-name="T1"> </text:span><text:span text:style-name="T2">(55/4) </text:span> ⲛⲟⲥ · ⲛⲓϩⲟⲟ̣ⲩ[ⲧ’ ⲙ̅]̅ⲛ̅ ⲛⲓⲅⲉⲛ̣[ⲉⲁ] <text:line-break/><text:span text:style-name="T1"> </text:span><text:span text:style-name="T2">(55/5) </text:span> ⲛ̅ϩⲟⲟⲩⲧ’ · ⲛⲓⲉ[ⲟⲟⲩ ⲛ̅ⲧⲉ ⲡⲓⲱⲧ’ ·] <text:line-break/><text:soft-page-break/><text:span text:style-name="T1"> </text:span><text:span text:style-name="T2">(55/6) </text:span> [ⲛ]ⲓ̣ⲉⲟⲟⲩ ⲛ̅ⲧⲉ ⲡ̣[ⲓⲛ]ⲟϭ [ⲛ̅ⲭ̅ⲥ̅ ⲙⲛ̅] <text:line-break/><text:span text:style-name="T1"> </text:span><text:span text:style-name="T2">(55/7) </text:span> [ⲛⲓ]ⲅ̣ⲉⲛⲟⲥ ⲛ̅ϩⲟⲟⲩ̣[ⲧ’·] ⲛⲓⲅ̣[ⲉⲛⲉⲁ ⲛ̅]‐ <text:line-break/><text:span text:style-name="T1"> </text:span><text:span text:style-name="T2">(55/8) </text:span> [ⲧⲁ]ⲩⲙⲟⲩϩ ⲙ̅ⲡⲓⲛⲟϭ̣ [ⲛ̅ⲛⲉⲱⲛ] <text:line-break/><text:span text:style-name="T1"> </text:span><text:span text:style-name="T2">(55/9) </text:span> [ⲛ̅ⲇ]ⲟⲝⲟⲙⲉⲇⲱⲛ̣ [ⲛ̅]ϩ[ⲉⲛϭⲟⲙ ⲛ̅]‐ <text:line-break/><text:span text:style-name="T1"> </text:span><text:span text:style-name="T2">(55/10) </text:span> [ⲧⲉ ⲟ]ⲩϣⲁϫⲉ ⲛ̅ⲧⲉ ⲡ̣[ⲓⲡⲗⲏⲣⲱⲙⲁ] <text:line-break/><text:span text:style-name="T1"> </text:span><text:span text:style-name="T2">(55/11) </text:span> [ⲛ̅ⲟ]ⲩⲟⲉⲓⲛ[·] ⲧⲟⲧⲉ ⲡⲓϣ̣̅̅[̅ⲙ̅ⲧ’] <text:line-break/><text:span text:style-name="T1"> </text:span><text:span text:style-name="T2">(55/12) </text:span> [ϩⲟⲟⲩ]ⲧ’ ⲛ̅ⲁⲗ[ⲟⲩ ⲙ̅ⲡⲓ]ⲛ̣ⲟϭ̣ [ⲛ̅ⲭ̅ⲥ̅] <text:line-break/><text:span text:style-name="T1"> </text:span><text:span text:style-name="T2">(55/13) </text:span> [ⲡ]ⲁ̣ⲓ̣̈ ⲉⲧⲁϥⲧⲁϩ[ⲥ̅ϥ̅ ⲛ̅ϭⲓ ⲡⲓⲛⲟϭ ⲛ̅]‐ <text:line-break/><text:span text:style-name="T1"> </text:span><text:span text:style-name="T2">(55/14) </text:span> [ⲁⲧ]ⲛ̣ⲁⲩ ⲉⲣⲟϥ ⲙ̅[ⲡ̅ⲛ̅ⲁ̅ ⲡⲁⲓ̈ ⲉⲧⲁⲩ] <text:line-break/><text:span text:style-name="T1"> </text:span><text:span text:style-name="T2">(55/15) </text:span> [ϯ ⲣ]ⲁ̣ⲛ ⲉⲧⲉϥϭⲟ[ⲙ ⲁⲓⲛⲟⲛ ⲁϥⲉⲓⲛⲉ] <text:line-break/><text:span text:style-name="T1"> </text:span><text:span text:style-name="T2">(55/16) </text:span> [ⲉϩ]ⲣ̣ⲁⲓ̈ ⲛ̅ⲟⲩⲥⲙⲟⲩ ⲙ̣̅[ⲡⲓⲛⲟϭ ⲛ̅]‐ <text:line-break/><text:span text:style-name="T1"> </text:span><text:span text:style-name="T2">(55/17) </text:span> [ⲁⲧⲛ]ⲁⲩ ⲉⲣⲟϥ ⲙ̣̅[ⲡ̅ⲛ̅ⲁ̅ ⲙ̅ⲛ̅ ϯϩⲟ]‐ <text:line-break/><text:span text:style-name="T1"> </text:span><text:span text:style-name="T2">(55/18) </text:span> [ⲟⲩ]ⲧ’ ⲙ̅ⲡⲁⲣⲑ̣[ⲉⲛⲟⲥ ⲓ̅̈̅ⲱ̅ⲏ̅ⲗ̅ ϯ]‐ <text:line-break/><text:span text:style-name="T1"> </text:span><text:span text:style-name="T2">(55/19) </text:span> [ⲥⲓⲅⲏ ⲛ̅]ⲟⲩⲕⲁⲣ[ⲱϥ ⲛ̅ⲟⲩⲥⲓⲅⲏ ϯ]‐ <text:line-break/><text:span text:style-name="T1"> </text:span><text:span text:style-name="T2">(55/20) </text:span> [ⲙ̅ⲛ̅ⲧ̅ⲛ]ⲟϭ ⲉⲧⲛ̣[ ⲉⲧⲉ] <text:line-break/><text:span text:style-name="T1"> </text:span><text:span text:style-name="T2">(55/21) </text:span> [ⲙⲉ]ⲩ̣ϫ̣ⲟⲟϥ· .[ ⲛ̅ⲛⲁⲧ’] <text:line-break/><text:span text:style-name="T1"> </text:span><text:span text:style-name="T2">(55/22) </text:span> [ϣ]ⲁϫⲉ ⲙ̅ⲙⲟ̣[ϥ...]...[ <text:line-break/><text:span text:style-name="T1"> </text:span><text:span text:style-name="T2">(55/23) </text:span> [ⲛⲁⲧ̅]̅ⲣ̅ⲟⲩⲱ ϩⲁ[ⲣⲱϥ ⲁⲩ]ⲱ ⲛ̅ⲛ[ⲁ] <text:line-break/><text:span text:style-name="T1"> </text:span><text:span text:style-name="T2">(55/24) </text:span> [ⲧ̅ⲣ̅]ϩ̣ⲉⲣⲙⲏⲛⲉ̣[ⲩⲉ ⲙ̅]ⲙ̣ⲟϥ ⲡ[ⲓ]‐ <text:line-break/><text:span text:style-name="T1"> </text:span><text:span text:style-name="T2">(55/25) </text:span> [ϣⲟ]ⲣ̅ⲡ̅’̅ ⲉⲧⲁϥ[ⲟⲩⲱⲛ̅]ϩ̅ [ⲉ]ⲃ̣ⲟⲗ̣ <text:line-break/><text:span text:style-name="T1"> </text:span><text:span text:style-name="T2">(55/26) </text:span> [ⲁ]ⲩⲱ ⲛ̅ⲛⲁⲧ’ⲧ[ⲁϣ]ⲉ ⲟⲉⲓ̣ϣ̣ <text:line-break/><text:span text:style-name="T1"> </text:span><text:span text:style-name="T2">(55/27) </text:span> [ⲙ̅]ⲙⲟϥ ⲛ̅ⲛⲁ[ⲧ’ ..] ϭⲓⲙⲁ· <text:line-break/><text:span text:style-name="T1"> </text:span><text:span text:style-name="T2">(56/1) </text:span> [ ]ⲉ ⲉⲧⲉ ⲙ̅ⲙⲟⲓ̈ϩⲉ <text:line-break/><text:span text:style-name="T1"> </text:span><text:span text:style-name="T2">(56/2) </text:span> [ ⲛ̅ⲛⲁⲧ’ϣⲁ]ϫⲉ ⲙ̅ⲙⲟϥ <text:line-break/><text:span text:style-name="T1"> </text:span><text:span text:style-name="T2">(56/3) </text:span> [..]ⲟⲩ[ ]ϥ ⲡⲁ ⲛⲓⲙ̅ⲛ̅ <text:line-break/><text:span text:style-name="T1"> </text:span><text:span text:style-name="T2">(56/4) </text:span> [ⲧⲛ]ⲟ̣ϭ ⲧⲏ̣[ⲣⲟ]ⲩ [ⲛ̅]ⲟⲩⲙ̅ⲛ̅ⲧⲛⲟϭ <text:line-break/><text:span text:style-name="T1"> </text:span><text:span text:style-name="T2">(56/5) </text:span> [ⲗⲛ̅]ⲧ̣ⲉ ϯⲥⲓ̣ⲅ̣[ⲏ ⲛ̅]ⲛⲟⲩⲕⲁⲣⲱϥ ⲙ̅‐ <text:line-break/><text:span text:style-name="T1"> </text:span><text:span text:style-name="T2">(56/6) </text:span> [ⲡⲓⲙⲁ] ⲉ̣[ⲧ̅ⲙ̅]ⲙ̣ⲁⲩ· ⲡⲓϣ̅ⲙⲧ’̅ ϩ̣[ⲟ]‐ <text:line-break/><text:span text:style-name="T1"> </text:span><text:span text:style-name="T2">(56/7) </text:span> [ⲟⲩⲧ’] ⲛ̅ⲁ[ⲗⲟ]ⲩ̣ ⲁϥⲉⲓⲛⲉ ⲉϩⲣ[ⲁⲓ̈ ⲛ̅]‐ <text:line-break/><text:span text:style-name="T1"> </text:span><text:span text:style-name="T2">(56/8) </text:span> [ⲟⲩⲥ]ⲙⲟⲩ̣ ⲁⲩⲱ ⲁϥⲣ̅ⲁⲓⲧ[ⲓ ⲛ̅ⲟⲩ]‐ <text:line-break/><text:span text:style-name="T1"> </text:span><text:span text:style-name="T2">(56/9) </text:span> [ϭⲟⲙ] ⲉⲃⲟⲗ {ϩ̅ⲓ}ⲧⲟⲟⲧ̅ϥ̅ ⲙ̅ⲡ[ⲓⲛⲟϭ] <text:line-break/><text:span text:style-name="T1"> </text:span><text:span text:style-name="T2">(56/10) </text:span> [ⲛ̅ⲛⲁⲧ]ⲛ[ⲁⲩ] ⲉⲣⲟϥ ⲙ̅ⲡ̅ⲛ̅ⲁ̅ ⲙ̣̅[ⲡⲁⲣ]‐ <text:line-break/><text:span text:style-name="T1"> </text:span><text:span text:style-name="T2">(56/11) </text:span> [ⲑⲉⲛⲓⲕⲟ]ⲛ̣· ⲧⲟⲧⲉ ⲁϥⲣ̅ϣ[ⲟⲣ̅ⲡ̅’̅] <text:line-break/><text:span text:style-name="T1"> </text:span><text:span text:style-name="T2">(56/12) </text:span> [ⲛ̅ⲟⲩ]ⲱ̣ⲛ̅ϩ̅ ⲉⲃ̣ⲟⲗ ⲙ̅ⲡ̣ⲓⲙⲁ ⲉⲧ̣̅[ⲙ̅]‐ <text:line-break/><text:span text:style-name="T1"> </text:span><text:span text:style-name="T2">(56/13) </text:span> [ⲙⲁⲩ] ⲛ̅[ϭⲓ ....]ⲥ ⲉⲧ̣[ <text:line-break/><text:span text:style-name="T1"> </text:span><text:span text:style-name="T2">(56/14) </text:span> [ ⲉ]ⲧⲛⲁⲩ ⲉϩ̣ⲉⲛⲉ[ⲟⲟⲩ] <text:line-break/><text:span text:style-name="T1"> </text:span><text:span text:style-name="T2">(56/15) </text:span> [ ϩⲉⲛⲁ]ϩⲱⲣ ϩ̅ⲛ̅ ⲟⲩ[ <text:line-break/><text:span text:style-name="T1"> </text:span><text:span text:style-name="T2">(56/16) </text:span> [ ϩ]ⲉ̣ⲛⲙⲩⲥⲧⲏⲣ[ⲓⲟⲛ] <text:line-break/><text:span text:style-name="T1"> </text:span><text:span text:style-name="T2">(56/17) </text:span> [ⲛ̅ⲛⲁⲧⲛⲁ]ⲩ ⲉⲣⲟⲟⲩ · ⲉϩⲉ[ⲛ <text:line-break/><text:span text:style-name="T1"> </text:span><text:span text:style-name="T2">(56/18) </text:span> [ ]. ⲛ̣̅ⲧⲉ ϯⲥⲓⲅⲏ̣ [ⲉⲧⲉ] <text:line-break/><text:span text:style-name="T1"> </text:span><text:span text:style-name="T2">(56/19) </text:span> [ⲧⲁⲓ̈ ⲧⲉ ϯϩⲟⲟ]ⲩⲧ’ ⲙ̅ⲡⲁⲣ[ⲑⲉⲛ]‐ <text:line-break/><text:span text:style-name="T1"> </text:span><text:span text:style-name="T2">(56/20) </text:span> [ⲟⲥ ⲓ̅̈̅ⲟ̅ⲩ̅ⲏ̅ⲗ̅ · ⲧⲟ]ⲧⲉ ⲁϥⲣ̅ϣ̣[ⲟⲣⲡ̅’] <text:line-break/><text:span text:style-name="T1"> </text:span><text:span text:style-name="T2">(56/21) </text:span> [ⲛ̅ⲟⲩⲱⲛ̅ϩ̅ ⲉ]ⲃ̣ⲟⲗ ⲛ̅ϭ[ⲓ ⲡⲁⲗ]‐ <text:line-break/><text:span text:style-name="T1"> </text:span><text:span text:style-name="T2">(56/22) </text:span> [ⲟⲩ ⲛ̅ⲧⲉ ⲡⲁ]ⲗ̣ⲟⲩ ⲏ̅ⲥ̅ⲏ̅ⲫ̅[̅ⲏ̅ⲭ̅] <text:line-break/><text:span text:style-name="T1"> </text:span><text:span text:style-name="T2">(56/23) </text:span> ⲁ̣ⲩⲱ̣ [ⲛ̅ϯϩⲉ] ⲁϥϫⲱⲕ ⲉⲃ̣[ⲟⲗ] <text:line-break/><text:span text:style-name="T1"> </text:span><text:span text:style-name="T2">(56/24) </text:span> [ⲛ̅]ϭⲓ ⲡ[ⲓⲱⲧ’ ⲧ]ⲙⲁⲁⲩ ⲡϣ[ⲏ]‐ <text:line-break/><text:span text:style-name="T1"> </text:span><text:span text:style-name="T2">(56/25) </text:span> [ⲣ]ⲉ̣ ϯϯ̣[ⲉ ⲛ̅ⲥⲫⲣ]ⲁⲅⲓⲥ ϯϭⲟ̣[ⲙ ⲛ̅]‐ <text:line-break/><text:soft-page-break/><text:span text:style-name="T1"> </text:span><text:span text:style-name="T2">(56/26) </text:span> ⲛⲁⲧϫⲣ[ⲟ ⲉⲣ]ⲟⲥ ⲉ̣ⲧⲉ ⲡⲁ̣[ⲓ̈ ⲡⲉ] <text:line-break/><text:span text:style-name="T1"> </text:span><text:span text:style-name="T2">(56/27) </text:span> ⲡⲓⲛⲟϭ [ⲛ̅ⲭ̅ⲥ̅] ⲛ̅ⲧⲉ̣ ⲛⲓⲁⲧ’ϫ̣[ⲱ]‐ <text:line-break/><text:span text:style-name="T1"> </text:span><text:span text:style-name="T2">(57/1) </text:span> ϩ̅ⲙ̅ ⲧⲏⲣⲟⲩ· [ <text:line-break/><text:span text:style-name="T1"> </text:span><text:span text:style-name="T2">(57/2) </text:span> ⲉⲧⲟⲩⲁⲁ[ⲃ ]ⲡⲁ[ <text:line-break/><text:span text:style-name="T1"> </text:span><text:span text:style-name="T2">(57/3) </text:span> ⲡⲓⲁⲣⲏϫ̅ϥ̅ ϯ̣[ ] ⲛ̅ⲧ..[ <text:line-break/><text:span text:style-name="T1"> </text:span><text:span text:style-name="T2">(57/4) </text:span> ϫⲱϩ̅ⲙ̅ ⲙ̅ⲛ̅ ⲛ[ ]ⲟⲩ ⲛ̅[ <text:line-break/><text:span text:style-name="T1"> </text:span><text:span text:style-name="T2">(57/5) </text:span> ϩⲉⲛϭⲟⲙ ⲛⲉ ⲙ̅[̅ⲛ̅ ϩⲉⲛⲉⲟⲟⲩ] <text:line-break/><text:span text:style-name="T1"> </text:span><text:span text:style-name="T2">(57/6) </text:span> [ⲙ̅]̅ⲛ̅ ϩⲉⲛⲁⲧ’ϫⲱ̣[ϩ̅ⲙ̅ <text:line-break/><text:span text:style-name="T1"> </text:span><text:span text:style-name="T2">(57/7) </text:span> [...] ⲁⲩⲉⲓ ⲉⲃⲟ̣ⲗ̣[ <text:line-break/><text:span text:style-name="T1"> </text:span><text:span text:style-name="T2">(57/8) </text:span> [...]ⲛ̣̅ⲥⲃⲱ .[ <text:line-break/><text:span text:style-name="T1"> </text:span><text:span text:style-name="T2">(57/9) </text:span> [ <text:line-break/><text:span text:style-name="T1"> </text:span><text:span text:style-name="T2">(57/10) </text:span> [ ]. ⲉⲃⲟ̣[ⲗ <text:line-break/><text:span text:style-name="T1"> </text:span><text:span text:style-name="T2">(57/11) </text:span> [..]ⲉ ⲉⲧⲛⲁ.[ <text:line-break/><text:span text:style-name="T1"> </text:span><text:span text:style-name="T2">(57/12) </text:span> [.].[...]ⲥⲉ ⲉ[ <text:line-break/><text:span text:style-name="T1"> </text:span><text:span text:style-name="T2">(57/13) </text:span> ⲡ̣ⲁⲓ̈ ⲁϥⲉⲓⲛⲉ ⲉ[ϩⲣⲁⲓ̈ ⲛ̅ⲟⲩⲥⲙⲟⲩ] <text:line-break/><text:span text:style-name="T1"> </text:span><text:span text:style-name="T2">(57/14) </text:span> ⲛ̣̅ⲡ[ⲓ]ⲁⲧⲟⲩⲱ̣[ⲛ̅ϩ̅ ⲉⲃⲟⲗ ⲛ̅ⲙⲩⲥⲧⲏ]] <text:line-break/><text:span text:style-name="T1"> </text:span><text:span text:style-name="T2">(57/15) </text:span> [ⲣⲓⲟ]ⲛ ⲉⲧ’ϩⲏⲡ’̣[ <text:line-break/><text:span text:style-name="T1"> </text:span><text:span text:style-name="T2">(57/16) </text:span> [ⲡⲓ]ⲕⲁⲗⲩⲡⲧ̣[ⲟⲥ ]ⲣ̅[ <text:line-break/><text:span text:style-name="T1"> </text:span><text:span text:style-name="T2">(57/17) </text:span> [...]ⲟ̣ⲛ ⲥ[ <text:line-break/><text:span text:style-name="T1"> </text:span><text:span text:style-name="T2">(57/18) </text:span> [...]̅.̅ⲏ̅ⲛ· ⲉ̣[ <text:line-break/><text:span text:style-name="T1"> </text:span><text:span text:style-name="T2">(57/19) </text:span> [ ]ϯⲥ̣[ <text:line-break/><text:span text:style-name="T1"> </text:span><text:span text:style-name="T2">(57/20) </text:span> [ ]ⲱⲧ[ <text:line-break/><text:span text:style-name="T1"> </text:span><text:span text:style-name="T2">(57/21) </text:span> [ⲙ̅]ⲙⲟϥ ϩ̅ⲙ̅ ⲡ[ ]. <text:line-break/><text:span text:style-name="T1"> </text:span><text:span text:style-name="T2">(57/22) </text:span> [ⲙ̅ⲛ̅] ⲛⲓⲉⲱⲛ .[ ⲑ]ⲣⲟ‐ <text:line-break/><text:span text:style-name="T1"> </text:span><text:span text:style-name="T2">(57/23) </text:span> [ⲛ]ⲟⲥ ϩⲉⲛ.[ ] ⲁ̣ⲩⲱ .[ <text:line-break/><text:span text:style-name="T1"> </text:span><text:span text:style-name="T2">(57/24) </text:span> [ⲡⲟ]ⲩⲁ ⲡⲟⲩⲁ [ ].[.]ⲟⲛ[ <text:line-break/><text:span text:style-name="T1"> </text:span><text:span text:style-name="T2">(57/25) </text:span> [ⲁ]ⲩ̣ⲕⲱ[ⲧ]ⲉ ⲉⲣ̣[ⲟⲟ]ⲩ̣ ⲛ̅ϭⲓ ϩⲉ[ⲛ]‐ <text:line-break/><text:span text:style-name="T1"> </text:span><text:span text:style-name="T2">(57/26) </text:span> [ⲁ]ⲛⲧⲃⲁ ⲛ̣̅[ϭⲟⲙ ⲛ̅ⲛⲁ]ⲧ’ϯ ⲏⲡ[ⲉ]‐ <text:line-break/><text:span text:style-name="T1"> </text:span><text:span text:style-name="T2">(58/1) </text:span> [ⲉⲣⲟⲟⲩ· ϩⲉⲛⲉⲟ]ⲟ̣ⲩ ⲙ̅ⲛ̅ ϩⲉⲛ‐ <text:line-break/><text:span text:style-name="T1"> </text:span><text:span text:style-name="T2">(58/2) </text:span> [ⲁⲧ’ϫ]ⲱ̣ϩ̅ⲙ̅ [ ] ⲁⲩⲱ ⲉⲩ <text:line-break/><text:span text:style-name="T1"> </text:span><text:span text:style-name="T2">(58/3) </text:span> [ ]ⲩⲉ[ ⲛ̅ⲧ]ⲉ ⲡⲓⲱⲧ’ <text:line-break/><text:span text:style-name="T1"> </text:span><text:span text:style-name="T2">(58/4) </text:span> [ⲙⲛ̅] ⲧⲙⲁ[ⲁⲩ ⲙ̅ⲛ̅] ⲡ̣ϣⲏⲣⲉ ⲙⲛ̅ <text:line-break/><text:span text:style-name="T1"> </text:span><text:span text:style-name="T2">(58/5) </text:span> [ⲡⲓⲡⲗⲏⲣⲱⲙⲁ] ⲧ̣ⲏⲣ̅ϥ̅ ⲉⲛⲧⲁⲓ̈ⲣ̅ϣ̅ⲣ̣[ⲡ’̅] <text:line-break/><text:span text:style-name="T1"> </text:span><text:span text:style-name="T2">(58/6) </text:span> [ⲛ̅ϫⲟⲟϥ ⲙ̅ⲛ̅ ϯ]ϯⲉ ⲛ̅ⲥⲫⲣⲁ̣[ⲅⲓⲥ] <text:line-break/><text:span text:style-name="T1"> </text:span><text:span text:style-name="T2">(58/7) </text:span> [ⲙⲛ̅ ⲡⲓⲙⲩⲥⲧⲏⲣ]ⲓⲟⲛ ⲛ̅ⲧⲉ ϩⲉ̣[ⲛ] <text:line-break/><text:span text:style-name="T1"> </text:span><text:span text:style-name="T2">(58/8) </text:span> [ⲙⲩⲥⲧⲏⲣⲓⲟⲛ] · ⲁ̣ⲩⲟⲩⲱ̣[ⲛϩ] <text:line-break/><text:span text:style-name="T1"> </text:span><text:span text:style-name="T2">(58/9) </text:span> [ⲉⲃⲟⲗ ].[ <text:line-break/><text:span text:style-name="T1"> </text:span><text:span text:style-name="T2">(58/10) </text:span> [ ].ⲟⲗϭ̣ⲁ̣[ <text:line-break/><text:span text:style-name="T1"> </text:span><text:span text:style-name="T2">(58/11) </text:span> [ ]ⲟ̣ⲩⲟ̣ⲛ .[ <text:line-break/><text:span text:style-name="T1"> </text:span><text:span text:style-name="T2">(58/12) </text:span> [ ]. ⲛ .[...].[ <text:line-break/><text:span text:style-name="T1"> </text:span><text:span text:style-name="T2">(58/13) </text:span> [ ⲉⲧ’]ⲕⲏ ⲉϩⲣⲁⲓ̈ ⲉ‐ <text:line-break/><text:span text:style-name="T1"> </text:span><text:span text:style-name="T2">(58/14) </text:span> [ϫ̅ⲛ̅ ] ⲙ̣̅ⲛ̅ ⲛⲓⲉⲱⲛ̣ ⲛ̅ <text:line-break/><text:span text:style-name="T1"> </text:span><text:span text:style-name="T2">(58/15) </text:span> [ ϩ̅ⲛ̅ ⲟ]ⲩⲙ̅ⲛ̅ⲧⲙ[ⲉ] <text:line-break/><text:span text:style-name="T1"> </text:span><text:span text:style-name="T2">(58/16) </text:span> [ⲛⲁⲙⲉ ]ⲩ ⲙ̅ⲛ̅ ⲛⲓ̣[ <text:line-break/><text:span text:style-name="T1"> </text:span><text:span text:style-name="T2">(58/17) </text:span> ⲑ[ ]ϥⲛⲁ· ⲙ̣̅̅[̅ <text:line-break/><text:span text:style-name="T1"> </text:span><text:span text:style-name="T2">(58/18) </text:span> ⲣⲉ[ ]ϣ̣ⲁ ⲉⲛⲉϩ̣ [ <text:line-break/><text:span text:style-name="T1"> </text:span><text:span text:style-name="T2">(58/19) </text:span> ⲛ̣[ ]ⲣⲉϥ[ <text:line-break/><text:soft-page-break/><text:span text:style-name="T1"> </text:span><text:span text:style-name="T2">(58/20) </text:span> ⲉ[ ]. ⲃⲉ .[ <text:line-break/><text:span text:style-name="T1"> </text:span><text:span text:style-name="T2">(58/21) </text:span> ⲛ[ ] ⲙ̅ⲛ̅ ⲛⲓⲉⲱ[ⲛ ⲛ̅]‐ <text:line-break/><text:span text:style-name="T1"> </text:span><text:span text:style-name="T2">(58/22) </text:span> ϣⲁ ⲉ[ⲛⲉϩ ϩ̅ⲛ̅ ⲟ]ⲩ̣ⲙ̅ⲛ̅ⲧⲙⲉ [ⲛⲁⲙⲉ] <text:line-break/><text:span text:style-name="T1"> </text:span><text:span text:style-name="T2">(58/23) </text:span> ⲧ̣ⲟⲧⲉ [ⲁⲥ{ⲉ̅ⲓ} ⲉⲃⲟ]ⲗ̣ ⲛ̅ϭⲓ ⲟⲩ[ⲡⲣⲟ]‐ <text:line-break/><text:span text:style-name="T1"> </text:span><text:span text:style-name="T2">(58/24) </text:span> [ⲛ]ⲟⲓⲁ ϩ̅[̅ⲛ̅ ⲟⲩⲥⲓⲅⲏ] ⲙ̅ⲛ̣̅ ⲟⲩ[ⲕⲁⲣ]‐ <text:line-break/><text:span text:style-name="T1"> </text:span><text:span text:style-name="T2">(58/25) </text:span> ⲱϥ [ⲉ]ϥ[ⲟⲛ̅ϩ̅ ⲛ̅ⲧ]ⲉ ⲡⲓⲡ̅ⲛⲁ̅ [ⲙ̅ⲛ̅] <text:line-break/><text:span text:style-name="T1"> </text:span><text:span text:style-name="T2">(58/26) </text:span> [ⲟ]ⲩϣⲁϫⲉ̣ [ⲛ̅ⲧⲉ] ⲡⲓ̣ⲱ̣ⲧ’ ⲙ̅ⲛ̅ [ⲟⲩ]‐ <text:line-break/><text:span text:style-name="T1"> </text:span><text:span text:style-name="T2">(58/27) </text:span> [ⲟ]ⲉⲓⲛ ⲉⲁ[ⲥ ].. ⲛ̣̅[ϯϯⲉ] <text:line-break/><text:span text:style-name="T1"> </text:span><text:span text:style-name="T2">(59/1) </text:span> ⲛ̅ⲥⲫⲣⲁⲅⲓⲥ ⲛⲏ̣ ⲉⲧⲁⲡ[ⲓⲱⲧ’ ⲛ̅ⲧⲟⲩ] <text:line-break/><text:span text:style-name="T1"> </text:span><text:span text:style-name="T2">(59/2) </text:span> ⲉⲃⲟⲗ ϩ̅ⲛ̅ ⲕⲟⲩⲛ̅ϥ̅· ⲉⲁⲥⲥⲓⲛ[ⲉ ⲉⲃⲟⲗ] <text:line-break/><text:span text:style-name="T1"> </text:span><text:span text:style-name="T2">(59/3) </text:span> ϩ̅ⲛ̅ ⲛⲓⲉⲱⲛ ⲧⲏⲣⲟⲩ ⲉⲧⲁⲓ̈ⲣ̅ϣ̣̅[ⲣⲡ̅ⲡ’] <text:line-break/><text:span text:style-name="T1"> </text:span><text:span text:style-name="T2">(59/4) </text:span> ⲛ̅ϫⲟⲟⲩ · ⲁⲩⲱ ⲉⲁⲥⲧⲁϫⲣⲉ ϩⲉⲛ‐ <text:line-break/><text:span text:style-name="T1"> </text:span><text:span text:style-name="T2">(59/5) </text:span> ⲑⲣⲟⲛⲟⲥ ⲛ̅ⲛⲉⲟ[ⲟ]ⲩ̣ [ⲙ̅]̅ⲛ̣̅̅ ϩⲉⲛ[ⲁⲛ]‐ <text:line-break/><text:span text:style-name="T1"> </text:span><text:span text:style-name="T2">(59/6) </text:span> [ⲧⲃ]ⲁ ⲛ̅ⲁⲅⲅⲉⲗⲟⲥ [ⲛ̅ⲛⲁⲧ’]ϯ ⲏⲡⲉ <text:line-break/><text:span text:style-name="T1"> </text:span><text:span text:style-name="T2">(59/7) </text:span> [ⲉⲧⲁ]ⲩⲕⲱⲧⲉ ⲉ[ⲣⲟⲟ]ⲩ ϩⲉⲛ[ϭⲟ]ⲙ̣ <text:line-break/><text:span text:style-name="T1"> </text:span><text:span text:style-name="T2">(59/8) </text:span> [ⲙ̅ⲛ̅ ϩⲉ]ⲛⲉⲟⲟⲩ ⲛ̅[ⲛⲁⲧ’ϫ]ⲱ̣[ϩ̅ⲙ̅·] ⲉⲩ‐ <text:line-break/><text:span text:style-name="T1"> </text:span><text:span text:style-name="T2">(59/9) </text:span> [ϩⲱⲥ ⲁ]ⲩⲱⲉ ⲉⲩϯ ⲉⲟⲟⲩ ⲉ̣[ⲩⲥ]ⲙⲟⲩ <text:line-break/><text:span text:style-name="T1"> </text:span><text:span text:style-name="T2">(59/10) </text:span> [ⲛ̅ⲧⲟⲟⲩ] ⲧ̣ⲏ̣[ⲣ]ⲟⲓ ϩ̅ⲛ̅ ⲟⲩ[ⲥⲙ]ⲏ̣ <text:line-break/><text:span text:style-name="T1"> </text:span><text:span text:style-name="T2">(59/11) </text:span> [ⲛ̅ⲟⲩⲱ]ⲧ̣ⲉ ϩ̅ⲛ̅ [ⲟ]ⲩ{ϩⲓ}ⲕⲱⲛ̣ [ϩ̅ⲛ̅] <text:line-break/><text:span text:style-name="T1"> </text:span><text:span text:style-name="T2">(59/12) </text:span> [ⲟⲩϩⲣⲟ]ⲟⲩ ⲛ̅ⲁ̣ⲧ’̣ⲕⲁⲣⲱϥ̣ [ <text:line-break/><text:span text:style-name="T1"> </text:span><text:span text:style-name="T2">(59/13) </text:span> [.... ⲙ̅]ⲡⲓ̣[ⲱ]ⲧ’ ⲙ̅[̅ⲛ̅] ⲧ̣[ⲙⲁⲁⲩ] <text:line-break/><text:span text:style-name="T1"> </text:span><text:span text:style-name="T2">(59/14) </text:span> [ⲙ̅ⲛ̅ ⲡϣ]ⲏⲣⲉ .[..] .[..] .[ⲙ̅ⲛ̅] <text:line-break/><text:span text:style-name="T1"> </text:span><text:span text:style-name="T2">(59/15) </text:span> [ⲛⲓⲡⲗⲏ]ⲣ̣ⲱⲙ[ⲁ ⲧⲏⲣⲟ]ⲩ̣ ⲉ[ⲧⲁⲓ̈ⲣ̅] <text:line-break/><text:span text:style-name="T1"> </text:span><text:span text:style-name="T2">(59/16) </text:span> [ϣ̅ⲣ̅ⲡ̅’̅ ⲛ̅]ϫⲟⲟ[ⲩ ⲉⲧⲉ] ⲡⲁⲓ̈ ⲡⲉ [ⲡⲓ]‐ <text:line-break/><text:span text:style-name="T1"> </text:span><text:span text:style-name="T2">(59/17) </text:span> [ⲛⲟϭ ⲛ̅]ⲭ̅ⲥ̅ ⲡⲓ[ⲉ]ⲃⲟⲗ ϩ̅ⲛ̅ ⲟⲩ[ⲥⲓⲅⲏ] <text:line-break/><text:span text:style-name="T1"> </text:span><text:span text:style-name="T2">(59/18) </text:span> [ⲉⲧⲉ ⲡⲁ]ⲓ̈ ⲡⲉ ⲡⲁ̣ⲗⲟⲩ ⲛ̅ⲛⲁ[ⲧ’]ϫ‐ <text:line-break/><text:span text:style-name="T1"> </text:span><text:span text:style-name="T2">(59/19) </text:span> [ⲱϩ̅ⲙ̅] ⲧ̅ⲉⲗⲙⲁⲏⲗ̅ ⲧ̅ⲉⲗⲙⲁⲭ[ⲁ]ⲏⲗ̣̅ <text:line-break/><text:span text:style-name="T1"> </text:span><text:span text:style-name="T2">(59/20) </text:span> [ⲏ̅ⲗ̅ⲓ̅ ⲏⲗ̅]ⲓ̣̅ ⲙ̅ⲁ̣ⲭ̣ⲁⲣ̅ ⲙ̅ⲁⲭⲁⲣ̅ <text:line-break/><text:span text:style-name="T1"> </text:span><text:span text:style-name="T2">(59/21) </text:span> [ⲥ̅ⲏ̅ⲑ̅ ϯ]ϭⲟⲙ [ⲉⲧ]ⲟⲛ̅ϩ̅ ϩ̅ⲛ̅ ⲟⲩⲙ̣̅ⲛ̅‐ <text:line-break/><text:span text:style-name="T1"> </text:span><text:span text:style-name="T2">(59/22) </text:span> [ⲧⲙⲉ ⲛⲁ]ⲙⲉ ⲙ[̅ⲛ̅ ϯϩⲟ]ⲟⲩⲧ’ ⲙ̣̅‐ <text:line-break/><text:span text:style-name="T1"> </text:span><text:span text:style-name="T2">(59/23) </text:span> [ⲡⲁⲣⲑⲉⲛ]ⲟⲥ ⲉⲧ̣ⲛⲙ[ⲙ]ⲁ̣[ϥ ⲓ̅̈̅]̅ⲟ̅ⲩ̅ⲏ̅ⲗ̅ <text:line-break/><text:span text:style-name="T1"> </text:span><text:span text:style-name="T2">(59/24) </text:span> [ⲙⲛ̅ ⲏ̅ⲥ̅]̅ⲏ̣̅̅ⲫ̅ⲏ̅ⲭ̅ ⲡ̣ⲓⲣⲉϥ[ⲁ]ⲙⲁϩⲧⲉ <text:line-break/><text:span text:style-name="T1"> </text:span><text:span text:style-name="T2">(59/25) </text:span> [ⲙ̅ⲡⲉⲟⲟ]ⲩ ⲡ[ⲁⲗⲟ]ⲩ ⲛ̅ⲧⲉ ⲡⲁⲗⲟ̣[ⲩ] <text:line-break/><text:span text:style-name="T1"> </text:span><text:span text:style-name="T2">(59/26) </text:span> [ⲙ̅ⲛ̅ ⲡⲓⲕⲗ]ⲟ̣ⲙ ⲛ̣̅[ⲧ]ⲉ ⲡⲉϥⲉⲟⲟⲩ <text:line-break/><text:span text:style-name="T1"> </text:span><text:span text:style-name="T2">(59/27) </text:span> [ ].ⲛ[ ] ⲛ̅ⲧⲉ ϯϯ[ⲉ] <text:line-break/><text:span text:style-name="T1"> </text:span><text:span text:style-name="T2">(59/28) </text:span> [ⲛ̅ⲥⲫⲣⲁ]ⲅⲓ̣ⲥ [ⲡⲓⲡⲗⲏ]ⲣⲱⲙⲁ ⲉ[ⲛ] <text:line-break/><text:span text:style-name="T1"> </text:span><text:span text:style-name="T2">(59/29) </text:span> [ⲧⲁⲓ̈ⲣ̅ϣ̅ⲣ̅]̅ⲡ̅’̅ ⲛ̅ϫ[ⲟⲟϥ] ⲉⲁϥⲣ̅ϣ[ⲟⲣ̅ⲡ’̅] <text:line-break/><text:span text:style-name="T1"> </text:span><text:span text:style-name="T2">(60/1) </text:span> [ⲛ̅{ⲉ̅ⲓ} ⲉⲃⲟ]ⲗ̣ ⲙ̅ⲙⲁⲩ ⲛ̅ϭⲓ ⲡⲓⲛⲟϭ ⲛ̅‐ <text:line-break/><text:span text:style-name="T1"> </text:span><text:span text:style-name="T2">(60/2) </text:span> [ϣⲁϫⲉ] ⲛ̣̅ⲁⲩⲧⲟⲅⲉⲛ̣ⲏⲥ ⲉⲧⲟⲛ̅ϩ̅ <text:line-break/><text:span text:style-name="T1"> </text:span><text:span text:style-name="T2">(60/3) </text:span> [ⲡⲛⲟⲩ]ⲧⲉ ϩ̅ⲛ̅ ⲟⲩⲙ̅ⲛ̅ⲧⲙⲉ· ϯⲫⲩ‐ <text:line-break/><text:span text:style-name="T1"> </text:span><text:span text:style-name="T2">(60/4) </text:span> [ⲥⲓⲥ ⲛ̅]ⲛⲁⲧ’̣ⲙⲓⲥⲉ ⲡⲁⲓ̈ ⲉϯⲛⲁϫⲱ <text:line-break/><text:span text:style-name="T1"> </text:span><text:span text:style-name="T2">(60/5) </text:span> [ⲙ̅]ⲡⲉϥⲣⲁⲛ ⲉⲓ̈ϫ̣ⲱ ⲙ̅ⲙⲟⲥ ϫⲉ <text:line-break/><text:span text:style-name="T1"> </text:span><text:span text:style-name="T2">(60/6) </text:span> [...]ⲁ̣̅̅ⲓ̅̈̅ⲁ̅[.....]ⲑ̅ⲁⲱⲑⲱⲥⲑ̅ .[.] <text:line-break/><text:span text:style-name="T1"> </text:span><text:span text:style-name="T2">(60/7) </text:span> [ⲉ]ⲧⲉ ⲡⲁⲓ̈ ⲡ̣[ⲉ ⲡ]ϣⲏⲣⲉ ⲙ̅ⲡⲓ̣[ⲛⲟϭ ⲛ̅]‐ <text:line-break/><text:span text:style-name="T1"> </text:span><text:span text:style-name="T2">(60/8) </text:span> ⲭ̣̅̅ⲥ̣̅̅ ⲉⲧⲉ [ⲡⲁⲓ̈] ⲡ̣ⲉ ⲡϣⲏⲣⲉ̣ [ⲛ̅ⲧⲉ ϯ]‐ <text:line-break/><text:span text:style-name="T1"> </text:span><text:span text:style-name="T2">(60/9) </text:span> ⲥⲓⲅ̣[ⲏ ⲛ̅]ⲛ[ⲁⲧ’]ϣⲁϫⲉ ⲙ̅ⲙⲟ̣[ⲥ ⲉ]‐ <text:line-break/><text:span text:style-name="T1"> </text:span><text:span text:style-name="T2">(60/10) </text:span> ⲁϥⲉ̣{[̅ⲓ} ⲉⲃ]ⲟⲗ ϩ̅ⲙ̅ ⲡⲓⲛⲟ̣ϭ̣ ⲛ̣̅ⲁ̣[ⲧⲛⲁⲩ] <text:line-break/><text:soft-page-break/><text:span text:style-name="T1"> </text:span><text:span text:style-name="T2">(60/11) </text:span> ⲉⲣ[ⲟϥ ⲁ]ⲩⲱ ⲛ̅ⲁⲧ’ϫ̣ⲱϩ̣[̅ⲙ̅ ⲙ̅ⲡ̅ⲛⲁ̅] <text:line-break/><text:span text:style-name="T1"> </text:span><text:span text:style-name="T2">(60/12) </text:span> ⲡ̣[ϣⲏ]ⲣⲉ ⲛ̅ⲧⲉ ϯⲥ̣ⲓ̣ⲅⲏ ⲙ̅ⲛ̣̅̅ [ⲟⲩⲥⲓ]‐ <text:line-break/><text:span text:style-name="T1"> </text:span><text:span text:style-name="T2">(60/13) </text:span> ⲅ̣ⲏ̣ [ⲁϥ]ⲟⲩⲱⲛ̅ϩ̅ ⲉ[ⲃ]ⲟⲗ ⲛ̅[ ] <text:line-break/><text:span text:style-name="T1"> </text:span><text:span text:style-name="T2">(60/14) </text:span> [ ]. ϯ[..] ⲧⲏ[ <text:line-break/><text:span text:style-name="T1"> </text:span><text:span text:style-name="T2">(60/15) </text:span> [...].[... ⲁⲧⲛ]ⲁ̣ⲩ ⲉⲣ[ⲟ <text:line-break/><text:span text:style-name="T1"> </text:span><text:span text:style-name="T2">(60/16) </text:span> [..ϩ]ⲏⲡ [.. ⲡⲣⲱ]ⲙⲉ ⲉⲧ̣[ <text:line-break/><text:span text:style-name="T1"> </text:span><text:span text:style-name="T2">(60/17) </text:span> [ⲙ̅ⲛ̅ ⲛ]ⲓⲁϩⲱⲣ̣ [ⲛ̅ⲧⲉ ⲡ]ⲉϥⲉⲟ[ⲟⲩ · ⲧⲟ] <text:line-break/><text:span text:style-name="T1"> </text:span><text:span text:style-name="T2">(60/18) </text:span> [ⲧⲉ ⲁ]ϥⲟⲩⲱⲛ̅ϩ̅ ⲉⲃ̣ⲟⲗ ϩ̅ⲙ̅ ⲡ̣[ <text:line-break/><text:span text:style-name="T1"> </text:span><text:span text:style-name="T2">(60/19) </text:span> .[.] ⲉⲧⲟⲩⲟⲛ̅ϩ̅ · [ⲁ]ⲩⲱ ⲁϥ[ⲧⲁϩⲟ] <text:line-break/><text:span text:style-name="T1"> </text:span><text:span text:style-name="T2">(60/20) </text:span> ⲉ[ⲣ]ⲁ̣ⲧⲟⲩ ⲙ̅ⲡⲓϥ[ⲧ]ⲟⲟⲩ ⲛ̅[ⲛⲉⲱⲛ] <text:line-break/><text:span text:style-name="T1"> </text:span><text:span text:style-name="T2">(60/21) </text:span> ϩ̅[̅ⲛ̅] ⲟⲩϣⲁϫⲉ ⲁ[ϥ]ⲧⲁϩⲟⲟ̣[ⲩ ⲉⲣⲁ]‐ <text:line-break/><text:span text:style-name="T1"> </text:span><text:span text:style-name="T2">(60/22) </text:span> ⲧⲟ̣ⲩ̣· ⲁϥⲉⲓⲛⲉ [ⲉϩⲣ]ⲁⲓ̈ ⲛ̅[ⲟⲩⲥⲙⲟⲩ] <text:line-break/><text:span text:style-name="T1"> </text:span><text:span text:style-name="T2">(60/23) </text:span> ⲙ̅ⲡ̣ⲓⲛⲟϭ ⲛ̅ⲛ̣[ⲁⲧ]ⲛⲁⲩ [ⲉⲣⲟϥ ⲙ̅]‐ <text:line-break/><text:span text:style-name="T1"> </text:span><text:span text:style-name="T2">(60/24) </text:span> ⲡⲁⲣ̣ⲑⲉⲛ[ⲓⲕ]ⲟ̣ⲛ ⲙ̅ⲡ̅ⲛ̅ⲁ̣̅̅[· ϯⲥⲓⲅⲏ]‐ <text:line-break/><text:span text:style-name="T1"> </text:span><text:span text:style-name="T2">(60/25) </text:span> ⲛ̅ⲧⲉ ⲡ̣[ⲓⲱ]ⲧ’̣ ϩ̅ⲛ̅ ⲟⲩⲥⲓ[ⲅⲏ ⲛ̅ⲧⲉ ϯ]‐ <text:line-break/><text:span text:style-name="T1"> </text:span><text:span text:style-name="T2">(60/26) </text:span> ⲥⲓⲅⲏ ⲉ[ⲧ]ⲟⲛ̅ϩ̅ ⲛ̅]ⲛ̣ⲟⲩⲕ[ⲁⲣⲱϥ] <text:line-break/><text:span text:style-name="T1"> </text:span><text:span text:style-name="T2">(60/27) </text:span> [ⲡⲓ]ⲙⲁ ⲉⲧ̅ϥ̅ⲙⲟ̣[ⲧ̅ⲛ̅] ⲙ[ⲙⲟϥ ⲛ̅ϩⲏⲧ̅ϥ̅] <text:line-break/><text:span text:style-name="T1"> </text:span><text:span text:style-name="T2">(60/28) </text:span> [ⲛ̅]ϭⲓ ⲡⲣⲱⲙ[ⲉ .]ⲉⲁϥ[ <text:line-break/><text:span text:style-name="T1"> </text:span><text:span text:style-name="T2">(60/29) </text:span> [ⲉ]ⲃⲟⲗ {ϩ̅ⲓ}ⲧⲟ[ⲟⲧ.] ⲛ̅ⲧ.[ <text:line-break/><text:span text:style-name="T1"> </text:span><text:span text:style-name="T2">(60/30) </text:span> [ⲉ]ⲃⲟⲗ· ⲧⲟ̣[ⲧⲉ ⲁⲥ]{ⲉ̅ⲓ} ⲉⲃⲟ̣[ⲗ ϩ̅ⲙ̅] <text:line-break/><text:span text:style-name="T1"> </text:span><text:span text:style-name="T2">(61/1) </text:span> ⲡⲙⲁ ⲉⲧ̅ⲙ̅ⲙⲁⲩ ⲛ̅ϭⲓ ϯⲛ̣[ⲟϭ ⲛ̅ⲕⲗⲟⲟ] <text:line-break/><text:span text:style-name="T1"> </text:span><text:span text:style-name="T2">(61/2) </text:span> ⲗⲉ ⲛ̅ⲧⲉ ⲡⲟⲩⲟⲉⲓⲛ ⲛ̅ϭⲓ ⲟⲩ̣[ϭⲟⲙ] <text:line-break/><text:span text:style-name="T1"> </text:span><text:span text:style-name="T2">(61/3) </text:span> ⲉⲥⲟⲛ̅ϩ̅ ⲧⲙⲁⲁⲩ ⲛ̅ⲧⲉ ⲛⲓⲁⲧ’ϫ[ⲱϩ̅ⲙ̅] <text:line-break/><text:span text:style-name="T1"> </text:span><text:span text:style-name="T2">(61/4) </text:span> ⲉⲧⲟⲩⲁⲁⲃ ⲛ̅ⲛⲓⲛⲟϭ ⲛ̅ϭⲟⲙ [ ] <text:line-break/><text:span text:style-name="T1"> </text:span><text:span text:style-name="T2">(61/5) </text:span> [ⲁ]ⲩⲱ ⲁⲥϫⲡⲟ ⲙ̅ⲡ[ⲁⲓ̈ ⲉ]ϯⲛⲁ[ϫⲱ ⲙ̅]‐ <text:line-break/><text:span text:style-name="T1"> </text:span><text:span text:style-name="T2">(61/6) </text:span> [ⲡⲉ]ϥ̣ⲣⲁⲛ ⲉⲓ̈ϫⲱ ⲙ̅[ⲙ]ⲟ̣ⲥ ϫⲉ [ⲛ̅ⲧⲕ̅]‐ <text:line-break/><text:span text:style-name="T1"> </text:span><text:span text:style-name="T2">(61/7) </text:span> [ⲟⲩⲁ ⲛ̅]ⲧ̅ⲕ̅ ⲟⲩⲁ ⲛ̅ⲧ̣̅[ⲕ̅ ⲟ]ⲩⲁ [ <text:line-break/><text:span text:style-name="T1"> </text:span><text:span text:style-name="T2">(61/8) </text:span> [ⲉⲁ ⲉⲁ] ⲉⲁ̣ ⲉⲡⲓⲇⲉ ⲡ̣[ⲁⲓ̈] ⲁⲇ̣[ⲁⲙⲁⲥ] <text:line-break/><text:span text:style-name="T1"> </text:span><text:span text:style-name="T2">(61/9) </text:span> [ⲟⲩⲟⲩⲟⲉⲓⲛ] ⲡⲉ ⲉⲁϥⲡⲓⲣⲉ̣ [ⲉⲃⲟⲗ] <text:line-break/><text:span text:style-name="T1"> </text:span><text:span text:style-name="T2">(61/10) </text:span> [ϩ̅ⲛ̅ ⲟⲩⲟⲉⲓ]ⲛ · ⲡⲃⲁⲗ ⲛ̅ⲧⲉ ⲡ[ⲟⲩⲟⲉⲓⲛ] <text:line-break/><text:span text:style-name="T1"> </text:span><text:span text:style-name="T2">(61/11) </text:span> [ⲡⲉ ⲡⲁⲓ̈] ⲅ̣ⲁⲣ ⲡⲓϣⲟⲣ̅ⲡ̅’̅ ⲛ̅ⲣⲱ̣[ⲙⲉ] <text:line-break/><text:span text:style-name="T1"> </text:span><text:span text:style-name="T2">(61/12) </text:span> [ⲡⲉ ⲉⲧⲉ ⲉ]ⲧ̣ⲃⲏⲏⲧ̅ϥ̅ ⲛⲁ̣ⲓ̈ ⲧⲏⲣ[ⲟⲩ ⲛⲉ] <text:line-break/><text:span text:style-name="T1"> </text:span><text:span text:style-name="T2">(61/13) </text:span> [ⲉⲧⲉ ⲉⲣⲟ]ϥ ⲧⲏⲣⲟⲩ ⲛ̣[ⲉ] ⲁ̣ⲩ̣[ⲱ ⲁϫ̅ⲛ̅] <text:line-break/><text:span text:style-name="T1"> </text:span><text:span text:style-name="T2">(61/14) </text:span> [ⲧ̅ϥ̅ ⲙ̅ⲛ̅ ⲗ]ⲁ̣ⲁⲩ· ⲡ[ⲓⲱⲧ’] ⲉⲧ[ⲁϥ{ⲉⲓ}] <text:line-break/><text:span text:style-name="T1"> </text:span><text:span text:style-name="T2">(61/15) </text:span> [ⲉⲃⲟⲗ ⲛ̅]ⲛⲁⲧ̅ⲣ̅ϫⲓⲟ[ⲟ]ⲣ̣ ⲙ̅ⲙ[ⲟϥ ⲁⲩⲱ] <text:line-break/><text:span text:style-name="T1"> </text:span><text:span text:style-name="T2">(61/16) </text:span> [ⲛ̅ⲁⲧ̅ⲣ̅]ⲛ̣[ⲟ]ⲉⲓ̣ ⲙ̅ⲙⲟϥ ⲉⲁϥ{ⲉⲓ} ⲉ̣[ⲃⲟⲗ ⲙ̅]‐ <text:line-break/><text:span text:style-name="T1"> </text:span><text:span text:style-name="T2">(61/17) </text:span> [ⲡⲥⲁϩⲣ]ⲉ ⲉ[ϩ]ⲣⲁⲓ̈ ϣⲁ ⲡϥⲱⲧ[ⲉ] ⲉ̣[ⲃⲟⲗ] <text:line-break/><text:span text:style-name="T1"> </text:span><text:span text:style-name="T2">(61/18) </text:span> [ⲛ̅ⲧⲉ ⲡⲓ]ϣⲱⲱⲧ’· ⲧⲟⲧⲉ ⲡⲓⲛ̣[ⲟϭ] <text:line-break/><text:span text:style-name="T1"> </text:span><text:span text:style-name="T2">(61/19) </text:span> [ⲛ̅ϣⲁϫ]ⲉ ⲛ̅ⲁⲩⲧⲟⲅⲉⲛⲏⲥ ⲛ̅ⲛⲟ[ⲩⲧⲉ] <text:line-break/><text:span text:style-name="T1"> </text:span><text:span text:style-name="T2">(61/20) </text:span> [ⲙ̅ⲛ̅ ⲡⲓⲁ]ⲧ’ϫⲱϩ̅ⲙ̅ ⲛ̅ⲣⲱⲙⲉ ⲁ̅[ⲇⲁⲙⲁⲥ̅] <text:line-break/><text:span text:style-name="T1"> </text:span><text:span text:style-name="T2">(61/21) </text:span> [ⲉⲁⲩϣⲱ]ⲡⲉ ϩ̅ⲛ̅ ⲟⲩϭⲱⲣ̅ϭ̅ ⲉ[ⲧⲉ ⲡⲁⲓ̈] <text:line-break/><text:span text:style-name="T1"> </text:span><text:span text:style-name="T2">(61/22) </text:span> [ⲡⲉ ⲡⲣⲱ]ⲙ̣ⲉ· ⲁⲩⲱ ⲁϥϣⲱⲡ̣[ⲉ ⲛ̅ϭⲓ] <text:line-break/><text:span text:style-name="T1"> </text:span><text:span text:style-name="T2">(61/23) </text:span> [ⲡⲣⲱⲙ]ⲉ̣ ⲉⲃⲟⲗ ϩⲓⲧⲛ ⲟⲩϣⲁ[ϫⲉ· ⲁϥ]‐ <text:line-break/><text:span text:style-name="T1"> </text:span><text:span text:style-name="T2">(61/24) </text:span> [ⲉⲓⲛⲉ ⲉ]ϩⲣⲁⲓ̈ ⲛ̅ⲟⲩⲥⲙⲟ̣ⲩ [ⲙ̅ⲡⲓⲛⲟϭ] <text:line-break/><text:span text:style-name="T1"> </text:span><text:span text:style-name="T2">(61/25) </text:span> [ⲛ̅ⲁⲧⲛ]ⲁ̣ⲩ ⲉⲣⲟϥ ⲁⲩⲱ ⲛ̣̅[ⲁⲧ’ⲧⲁϩⲟϥ] <text:line-break/><text:span text:style-name="T1"> </text:span><text:span text:style-name="T2">(61/26) </text:span> [ⲁⲩⲱ ⲙ̅ⲡ]ⲁ̣ⲣⲑⲉⲛⲓⲕⲟ[ⲛ ⲙ̅ⲡ̅ⲛ̅ⲁ̅ ⲙ̅ⲛ̅] <text:line-break/><text:span text:style-name="T1"> </text:span><text:span text:style-name="T2">(61/27) </text:span> [ϯϩⲟⲟⲩ]ⲧ’ ⲙ̅ⲡⲁⲣⲑⲉ[ⲛⲟⲥ ϯⲃⲁⲣⲃⲏ]‐ <text:line-break/><text:soft-page-break/><text:span text:style-name="T1"> </text:span><text:span text:style-name="T2">(61/28) </text:span> [ⲗⲱ ⲙ̅ⲛ̅ ⲡⲓ]ϣ̅ⲙⲧ’̅ ϩⲟⲟⲩ̣[ⲧ’ ⲛ̅ⲁⲗⲟⲩ] <text:line-break/><text:span text:style-name="T1"> </text:span><text:span text:style-name="T2">(61/29) </text:span> [ⲙ̅ⲛ̅ ϯϩⲟⲟ]ⲩⲧ’ ⲙ̅ⲡⲁ[ⲣⲑⲉⲛⲟⲥ ⲓ̈ⲟⲩⲏⲗ] <text:line-break/><text:span text:style-name="T1"> </text:span><text:span text:style-name="T2">(62/1) </text:span> [ⲙ̅ⲛ̅ ⲡⲁⲗ]ⲟ̣ⲩ ⲏ̅ⲥⲏⲫⲏⲭ̅ ⲡⲓⲣⲉϥⲁⲙⲁϩ <text:line-break/><text:span text:style-name="T1"> </text:span><text:span text:style-name="T2">(62/2) </text:span> [ⲧⲉ ⲙ̅ⲡ]ⲉⲟⲟⲩ ⲙ̅ⲛ̅ 〈ⲡⲁⲗⲟⲩ〉 ⲛ̅ⲧⲉ ⲡⲓ‐ <text:line-break/><text:span text:style-name="T1"> </text:span><text:span text:style-name="T2">(62/3) </text:span> [ⲁⲗⲟⲩ] ⲙ̅ⲛ̅ ⲡⲓⲕⲗⲟⲙ ⲛ̅ⲧⲉ ⲡⲉϥⲉⲟⲟⲩ· <text:line-break/><text:span text:style-name="T1"> </text:span><text:span text:style-name="T2">(62/4) </text:span> [ⲙ̅ⲛ̅ ⲛ]ⲓ̣ⲛⲟϭ ⲛ̅ⲛⲉⲱⲛ ⲛ̅ⲇⲟⲝⲟⲙⲉⲇⲱⲛ <text:line-break/><text:span text:style-name="T1"> </text:span><text:span text:style-name="T2">(62/5) </text:span> [ⲙ̅ⲛ̅ ⲛⲓ]ⲑⲣⲟⲛⲟⲥ ⲉⲧ̅ⲛ̅ϩⲏⲧⲟⲩ ⲙ̅ⲛ̅ <text:line-break/><text:span text:style-name="T1"> </text:span><text:span text:style-name="T2">(62/6) </text:span> [ⲛⲓϭⲟ]ⲙ̣ ⲉ[ⲧⲕ]ⲱ̣ⲧⲉ ⲉⲣⲟⲟⲩ · ϩⲉ[ⲛⲉ] <text:line-break/><text:span text:style-name="T1"> </text:span><text:span text:style-name="T2">(62/7) </text:span> [ⲟⲟⲯ] ⲙ̣̅̅ⲛ̣̅̅ ϩⲉ[ⲛⲁ]ⲧ’ϫⲱϩ̅ⲙ̅ ⲙ̅ⲛ̅ [ⲡⲓⲡⲗⲏ]‐ <text:line-break/><text:span text:style-name="T1"> </text:span><text:span text:style-name="T2">(62/8) </text:span> [ⲣⲱⲙⲁ] ⲧ̣ⲏ̣[ⲣ̅ϥ̅] ⲉⲧⲁⲓ̈ⲣ̅ϣ̅ⲣⲡ’̅ [ⲛ̅ϫⲟⲟϥ] <text:line-break/><text:span text:style-name="T1"> </text:span><text:span text:style-name="T2">(62/9) </text:span> [ⲙ̅ⲛ̅ ⲡⲕ]ⲁ̣ϩ [ⲙ̅ⲡ]ⲁⲏⲣ · ⲡⲓ[ⲣ]ⲉϥ̣[ϣⲉⲡ’] <text:line-break/><text:span text:style-name="T1"> </text:span><text:span text:style-name="T2">(62/10) </text:span> [ⲛⲟⲩⲧⲉ] ⲉⲣⲟϥ ⲡⲓⲙⲁ [ⲉⲧⲟⲩϫⲓ {ϩ̅ⲓ}] <text:line-break/><text:span text:style-name="T1"> </text:span><text:span text:style-name="T2">(62/11) </text:span> [ⲕⲱⲛ ⲛ̅]ϭ̣[ⲓ] ⲛⲓⲣⲱⲙⲉ ⲉ̣[ⲧⲟⲩⲁⲁⲃ ⲛ̅]‐ <text:line-break/><text:span text:style-name="T1"> </text:span><text:span text:style-name="T2">(62/12) </text:span> [ⲧⲉ ⲡ]ⲟ̣ⲩⲉⲓⲛ ⲛ̅ⲧⲉ ⲡⲓⲱ̣[ⲧ ⲛ̅ⲧⲉ ϯ]‐ <text:line-break/><text:span text:style-name="T1"> </text:span><text:span text:style-name="T2">(62/13) </text:span> [ⲥⲓⲅⲏ] ⲙ̅ⲛ̅ ϯⲡⲏⲅⲏ ⲉⲧⲟ̣ⲛ̣̅[ϩ̅ ⲛ̅ⲥⲓⲅⲏ] <text:line-break/><text:span text:style-name="T1"> </text:span><text:span text:style-name="T2">(62/14) </text:span> [ⲡⲓ]ⲱⲧ’ ⲙ̣̅̅ⲛ̣̅̅ ⲡⲓⲡⲗⲏⲣ[ⲱⲙⲁ ⲧⲏⲣ̅ϥ̅] <text:line-break/><text:span text:style-name="T1"> </text:span><text:span text:style-name="T2">(62/15) </text:span> [ⲉⲧⲛ]ⲧ̣[ⲱⲩ ⲛ̅]ⲑⲉ ⲉⲛⲧⲁⲓ̈[ⲣ̅ϣ̅ⲣ̅ⲡ̅’̅ ⲛ̅]‐ <text:line-break/><text:span text:style-name="T1"> </text:span><text:span text:style-name="T2">(62/16) </text:span> [ϫⲟ]ⲟⲥ̣ [ⲁϥⲉⲓⲛ]ⲉ ⲉϩⲣⲁⲓ̈ [ⲛ̅ⲟⲩⲥⲙⲟⲩ] <text:line-break/><text:span text:style-name="T1"> </text:span><text:span text:style-name="T2">(62/17) </text:span> [ⲛ̅ϭⲓ ⲡ]ⲓⲛⲟϭ̣ ⲛ̅ϣⲁϫⲉ ⲛ̅ⲁ[ⲩⲧⲟⲅⲉ]‐ <text:line-break/><text:span text:style-name="T1"> </text:span><text:span text:style-name="T2">(62/18) </text:span> [ⲛⲏ]ⲥ̣ ⲛ̅ⲛⲟⲩⲧⲉ ⲙ̅ⲛ̅ [ⲡ]ⲓ̣[ⲁⲧ’ϫⲱϩ̅ⲙ̅] <text:line-break/><text:span text:style-name="T1"> </text:span><text:span text:style-name="T2">(62/19) </text:span> [ⲛ̅]ⲣ̣ⲱⲙⲉ ⲁ̅ⲇ̅ⲁ̅ⲙ̅ⲁ̅ⲥ̅ ⲁⲩ̣[ⲱ ⲁⲩⲣ̅ⲁⲓ] <text:line-break/><text:span text:style-name="T1"> </text:span><text:span text:style-name="T2">(62/20) </text:span> [ⲧⲓ] ⲛ̅ⲟⲩϭⲟⲙ ⲙ̅ⲛ̅ ⲟⲩϫ[ⲣⲟ ϣⲁ ⲉ]‐ <text:line-break/><text:span text:style-name="T1"> </text:span><text:span text:style-name="T2">(62/21) </text:span> [ⲛ]ⲉϩ ⲙ̅ⲛ̅ ⲟⲩⲙ̅ⲛ̅ⲧ’ⲁⲧ’ϫ̣[ⲱϩ̅ⲙ̅ ⲙ̅]‐ <text:line-break/><text:span text:style-name="T1"> </text:span><text:span text:style-name="T2">(62/22) </text:span> [ⲡ]ⲓⲁⲩⲧⲟⲅⲉⲛⲏⲥ ⲉⲩ[ⲡⲗⲏⲣⲱ] <text:line-break/><text:span text:style-name="T1"> </text:span><text:span text:style-name="T2">(62/23) </text:span> [ⲙⲁ] ⲛ̅ⲧⲉ ⲡⲓϥⲧⲟⲟⲩ ⲛ̣̅[ⲛⲉⲱⲛ] <text:line-break/><text:span text:style-name="T1"> </text:span><text:span text:style-name="T2">(62/24) </text:span> [{ϩ̅ⲓ}ⲛ]ⲁ̣ ⲉⲃⲟⲗ {ϩⲓ}ⲧⲟⲟⲧⲟ[ⲩ ⲛ̅ⲧⲉϥ] <text:line-break/><text:span text:style-name="T1"> </text:span><text:span text:style-name="T2">(62/25) </text:span> [ⲟⲩ]ⲱⲛ̅ϩ̅ ⲉⲃⲟⲗ ⲛ̅ϭⲓ ⲡ[ⲉⲟⲟⲩ ⲙ̅ⲛ̅]‐ <text:line-break/><text:span text:style-name="T1"> </text:span><text:span text:style-name="T2">(62/26) </text:span> [ϯϭⲟ]ⲙ̣ ⲛ̅ⲧⲉ ⲡⲓⲱⲧ’ ⲛ̅.[... ⲛ̅ⲛ̅]‐ <text:line-break/><text:span text:style-name="T1"> </text:span><text:span text:style-name="T2">(62/27) </text:span> [ⲣⲱⲙⲉ ⲉ]ⲧⲟⲩⲁⲁⲃ ⲛ̅ⲧⲉ ⲡ̣[ⲓⲛⲟϭ ⲛ̅]‐ <text:line-break/><text:span text:style-name="T1"> </text:span><text:span text:style-name="T2">(62/28) </text:span> [ⲟⲩⲟⲉⲓ]ⲛ̣ ⲡⲏ ⲉⲧⲛⲁⲉ̣{[̅ⲓ} ⲉⲡⲉⲥⲏⲧ’] <text:line-break/><text:span text:style-name="T1"> </text:span><text:span text:style-name="T2">(62/29) </text:span> [ϣⲁ ⲡⲓⲕⲟ]ⲥⲙⲟⲥ ⲛ̅ⲉⲓ̣[ⲛⲉ ⲛ̅ⲟⲩϣⲏ] <text:line-break/><text:span text:style-name="T1"> </text:span><text:span text:style-name="T2">(62/30) </text:span> [ⲧⲟⲧⲉ] ⲡ̣ⲓⲁⲧ’ϫⲱϩ̅ⲙ̣̅̅ [ⲛ̅ⲛⲟϭ ⲛ̅]‐ <text:line-break/><text:span text:style-name="T1"> </text:span><text:span text:style-name="T2">(62/31) </text:span> [ⲣⲱⲙⲉ ⲁ̅ⲇ̅ⲁ̅ⲙ̅]̅ⲁ̅ⲥ̅ ⲁϥⲣ̅ⲁ̣[ⲓⲧⲓ ⲛ̅]‐ <text:line-break/><text:span text:style-name="T1"> </text:span><text:span text:style-name="T2">(63/1) </text:span> ⲟⲩϣⲏⲣⲉ ⲛⲁϥ ⲉⲃⲟⲗ ⲙ̅ⲙⲟ̣[ϥ {ϩ̅ⲓ}ⲛⲁ] <text:line-break/><text:span text:style-name="T1"> </text:span><text:span text:style-name="T2">(63/2) </text:span> ⲛ̅ⲧⲟϥ ⲛ̅ⲧⲉϥϣⲱⲡⲉ ⲛ̅ⲉⲓⲱ̣[ⲧ’ ⲛ̅ϯ]‐ <text:line-break/><text:span text:style-name="T1"> </text:span><text:span text:style-name="T2">(63/3) </text:span> ⲅⲉⲛⲉⲁ ⲛ̅ⲁⲧ’ⲕⲓⲙ ⲁⲩⲱ ⲛ̅[ⲁⲧ’ϫⲱ] <text:line-break/><text:span text:style-name="T1"> </text:span><text:span text:style-name="T2">(63/4) </text:span> ϩ̅ⲙ̅ ⲁⲩⲱ ⲉⲧⲃⲏⲧ̅ⲥ̅ ⲛ̅ⲧ̣〈ⲉ〉ⲥⲣ̅[ϣⲟⲣ̅ⲡ’̅] <text:line-break/><text:span text:style-name="T1"> </text:span><text:span text:style-name="T2">(63/5) </text:span> ⲛ̅ⲟⲩⲱⲛ̅ϩ̅ ⲉⲃⲟⲗ ⲛ̅[ϭⲓ ϯⲥ]ⲓ̣ⲅ̣ⲏ̣ [ⲙ̅ⲛ̅ ϯ]‐ <text:line-break/><text:span text:style-name="T1"> </text:span><text:span text:style-name="T2">(63/6) </text:span> [ⲥ]ⲙ̣ⲏ̣ ⲁⲩⲱ ⲉⲧⲃⲏⲏⲧ̅ⲥ̅ ⲛ[̅ϥ̅ⲧⲱ]‐ <text:line-break/><text:span text:style-name="T1"> </text:span><text:span text:style-name="T2">(63/7) </text:span> [ⲱⲛ̅ϥ̅ ⲛ̅]ϭⲓ ⲡⲓⲉⲱⲛ ⲉⲧⲙⲟ̣[ⲟⲩⲧ’] <text:line-break/><text:span text:style-name="T1"> </text:span><text:span text:style-name="T2">(63/8) </text:span> [ϫⲉⲕⲁ]ⲁⲥ̣ ⲉϥⲛⲁⲃⲱⲗ ⲉⲃ[ⲟⲗ ⲁⲩⲱ] <text:line-break/><text:span text:style-name="T1"> </text:span><text:span text:style-name="T2">(63/9) </text:span> [ⲛ̅ϯϩⲉ ⲁⲥⲣ̅]ϣⲟⲣ̅ⲡ̅’̅ ⲛ̅{ⲉⲓ} ⲉ̣[ⲃⲟⲗ ⲛ̅ⲥⲁ]‐ <text:line-break/><text:span text:style-name="T1"> </text:span><text:span text:style-name="T2">(63/10) </text:span> [ϩⲣⲁⲓ̈ ⲛ̅ϭⲓ ϯ]ϭⲟⲙ ϯⲛⲟϭ̣ [ⲛ̅ϭⲟⲙ] <text:line-break/><text:span text:style-name="T1"> </text:span><text:span text:style-name="T2">(63/11) </text:span> [ⲛ̅ⲧⲉ ⲡ]ⲓ̣ⲛⲟϭ ⲛ̅ⲟⲩⲟⲉⲓⲛ 〈ⲡ〉ⲡ̅ⲣ̅[ⲉⲓⲱⲟⲩ] <text:line-break/><text:span text:style-name="T1"> </text:span><text:span text:style-name="T2">(63/12) </text:span> [ⲁⲩⲱ ⲁⲥ]ϫ̣ⲡⲟ ⲙ̅ⲡⲓϥⲧⲟⲟⲩ ⲙ̅[ⲫⲱⲥ]‐ <text:line-break/><text:span text:style-name="T1"> </text:span><text:span text:style-name="T2">(63/13) </text:span> [ⲧⲏⲣ ⲁ̅ⲣ̅]̅ⲙ̅ⲟ̅ⲍ̅ⲏ̅ⲗ̅ · ⲟ̅[ⲣ]ⲟⲓ̈ⲁⲏⲗ̣̅ <text:line-break/><text:span text:style-name="T1"> </text:span><text:span text:style-name="T2">(63/14) </text:span> [ⲇ̅ⲁ̅ⲩ̅ⲉ̅ⲓ̅ⲑ̅ⲉ̅·] ⲏ̅ⲗⲏⲗⲏ[[ⲑ̅] ⲙ̅ⲛ̅ ⲡ[ⲓⲛⲟϭ] <text:line-break/><text:soft-page-break/><text:span text:style-name="T1"> </text:span><text:span text:style-name="T2">(63/15) </text:span> [ⲛ̅ⲁⲧ’ϫⲱ]ϩ̅ⲙ̅ ⲥ̅ⲏⲑ̅ ⲡⲓϣⲏⲣ[ⲉ ⲛ̅ⲧⲉ] <text:line-break/><text:span text:style-name="T1"> </text:span><text:span text:style-name="T2">(63/16) </text:span> [ⲡⲓⲛⲟϭ ⲛ̅ⲁ]ⲧ’ϫⲱϩ̅ⲙ̅ ⲛ̅ⲣⲱⲙ̣ⲉ <text:line-break/><text:span text:style-name="T1"> </text:span><text:span text:style-name="T2">(63/17) </text:span> [ⲁⲇⲁⲙⲁⲥ ⲁ]ⲩⲱ ⲛ̅ϯϩⲉ ⲁⲩϫⲱⲕ <text:line-break/><text:span text:style-name="T1"> </text:span><text:span text:style-name="T2">(63/18) </text:span> [ⲉⲃⲟⲗ ⲛ̅ϯ]ϩ̣ⲉⲃⲇⲁⲙⲁⲥ ⲉⲧ’ϫⲏⲕ <text:line-break/><text:span text:style-name="T1"> </text:span><text:span text:style-name="T2">(63/19) </text:span> [ⲉⲃⲟⲗ ⲧⲏ ⲉⲧ’]ϣⲟⲟⲡ’ ϩ̅ⲛ̅ ⲟⲩⲙⲩ‐ <text:line-break/><text:span text:style-name="T1"> </text:span><text:span text:style-name="T2">(63/20) </text:span> [ⲥⲧⲏⲣⲓⲟⲛ] ⲛ̅ⲧⲉ ϩⲉⲛⲙⲩⲥⲧⲏⲣⲓⲟⲛ <text:line-break/><text:span text:style-name="T1"> </text:span><text:span text:style-name="T2">(63/21) </text:span> [ⲉⲩϩⲏⲡ’] ⲧⲏ ⲉⲧⲁⲥϫⲓ ⲙ̅ⲡⲉⲟ̣[ⲟⲩ] <text:line-break/><text:span text:style-name="T1"> </text:span><text:span text:style-name="T2">(63/22) </text:span> [.....]ⲁ ⲉⲁⲥϣⲱⲡⲉ ⲛ̅ⲟ[ⲩϩⲉⲛ] <text:line-break/><text:span text:style-name="T1"> </text:span><text:span text:style-name="T2">(63/23) </text:span> [ⲇⲉⲕⲁⲥ] ⲛ̅ⲟⲅⲇⲟⲁⲥ {ϩ̅ⲓ}ⲛⲁ [ⲛ̅ⲧⲉⲥ]‐ <text:line-break/><text:span text:style-name="T1"> </text:span><text:span text:style-name="T2">(63/24) </text:span> [ϫⲱⲕ ϩ̅]̅ⲛ̅ ϥⲧⲟ ⲛ̅ⲟⲅⲇⲟⲁⲥ̣ [ⲁⲩⲱ] <text:line-break/><text:span text:style-name="T1"> </text:span><text:span text:style-name="T2">(63/25) </text:span> [ⲁϥϯ ⲙⲉ]ⲧ̣ⲉ ⲛ̅ϭⲓ ⲡⲓⲱ̣ⲧ’ [ⲁⲩⲱ ⲁϥⲣ̅] <text:line-break/><text:span text:style-name="T1"> </text:span><text:span text:style-name="T2">(63/26) </text:span> [ϣⲃⲏⲣ ⲛ̅ϯ] ⲙⲉⲧⲉ ⲛ̅ϭⲓ ⲡⲓⲡ̣[ⲗⲏⲣⲱⲙⲁ] <text:line-break/><text:span text:style-name="T1"> </text:span><text:span text:style-name="T2">(63/27) </text:span> [ⲛ̅ⲧⲉ ⲛⲓⲫ]ⲱ̣ⲥⲧⲏⲣ ⲁⲩⲣ̅ϣ[ⲟⲣ̅ⲡ̅’̅ ⲛ̅]‐ <text:line-break/><text:span text:style-name="T1"> </text:span><text:span text:style-name="T2">(63/28) </text:span> [ⲟⲩⲱⲛ̅ϩ̅] ⲉⲃⲟⲗ ⲛ̅ϭⲓ ϩⲉⲛⲥⲩ[ⲛⲍⲩⲅⲟⲥ] <text:line-break/><text:span text:style-name="T1"> </text:span><text:span text:style-name="T2">(63/29) </text:span> [ⲉⲡⲓⲡⲗⲏⲣ]ⲱⲙⲁ ⲛ̅ⲧⲉ ϯⲟⲅⲇ̣[ⲟⲁⲥ] <text:line-break/><text:span text:style-name="T1"> </text:span><text:span text:style-name="T2">(64/1) </text:span> [ⲛ̅ⲧⲉ ⲡⲓⲁ]ⲩⲧⲟⲅ̣ⲉⲛⲏⲥ ⲛ̅ⲛⲟⲩⲧⲉ <text:line-break/><text:span text:style-name="T1"> </text:span><text:span text:style-name="T2">(64/2) </text:span> [ⲡϩⲙⲟ]ⲧ’ ⲙ̅ⲡⲓϣⲟⲣ̅ⲡ̅’̅ ⲙ̅ⲫⲱⲥⲧⲏⲣ <text:line-break/><text:span text:style-name="T1"> </text:span><text:span text:style-name="T2">(64/3) </text:span> [ⲁ̅ⲣ̅ⲙ̅ⲟ̅]̅ⲍ̅ⲏ̅ⲗ̅ · ⲧⲉⲥⲑⲏⲥⲓⲥ ⲙ̅ⲡⲓⲙⲉϩ <text:line-break/><text:span text:style-name="T1"> </text:span><text:span text:style-name="T2">(64/4) </text:span> [ⲥⲛⲁⲩ] ⲙ̅ⲫⲱⲥⲧⲏⲣ · ⲟ̅ⲣ̅ⲟ̅ⲓ̅̈̅ⲁ̅ⲏ̅ⲗ̅ · <text:line-break/><text:span text:style-name="T1"> </text:span><text:span text:style-name="T2">(64/5) </text:span> [ⲡⲥⲟⲟ]ⲩⲛ ⲙ̅ⲡ[ⲓ]ⲙⲉϩϣⲟⲙⲉⲧ’ ⲙ̅‐ <text:line-break/><text:span text:style-name="T1"> </text:span><text:span text:style-name="T2">(64/6) </text:span> [ⲫⲱⲥ]ⲧⲏⲣ ⲇ̣̅̅ⲁ̅ⲩ̅ⲉ̅ⲓ̅ⲑ̅ⲉ̅ · ⲧⲉⲥⲃ̣[ⲱ] <text:line-break/><text:span text:style-name="T1"> </text:span><text:span text:style-name="T2">(64/7) </text:span> [ⲙ̅ⲡⲓⲙ]ⲉϩϥⲧⲟⲟⲩ ⲙ̅ⲫⲱⲥ̣[ⲧⲏⲣ] <text:line-break/><text:span text:style-name="T1"> </text:span><text:span text:style-name="T2">(64/8) </text:span> [ⲏ̅ⲗ̅ⲏ̅ⲗ̅]̅ⲏ̣̅̅ⲑ̅ · ⲉⲧⲉ ⲧⲁⲓ̈ ⲧⲉ ϯ[ϣⲟⲣⲡ’] <text:line-break/><text:span text:style-name="T1"> </text:span><text:span text:style-name="T2">(64/9) </text:span> [ⲛ̅ⲟⲅⲇⲟ]ⲁⲥ ⲛ̅ⲧⲉ ⲡⲓⲁⲩⲧ̣[ⲟⲅⲉⲛⲏⲥ] <text:line-break/><text:span text:style-name="T1"> </text:span><text:span text:style-name="T2">(64/10) </text:span> [ⲛ̅ⲛⲟⲩⲧⲉ] ⲁ̣ⲩⲱ ⲁϥϯ ⲙ[ⲉⲧⲉ ⲛ̅ϭⲓ ⲡⲓ]‐ <text:line-break/><text:span text:style-name="T1"> </text:span><text:span text:style-name="T2">(64/11) </text:span> [ⲱⲧ’ ⲁ]ⲩⲱ̣ ⲁϥⲣ̅ϣⲃⲏⲣ ⲛ̅ϯ̣ [ⲙⲉⲧⲉ] <text:line-break/><text:span text:style-name="T1"> </text:span><text:span text:style-name="T2">(64/12) </text:span> [ⲛ̅ϭⲓ] ⲡⲓⲡⲗⲏⲣⲱⲙⲁ ⲧⲏⲣ̣̅̅ϥ̣̅̅ [ⲛ̅ⲧⲉ] <text:line-break/><text:span text:style-name="T1"> </text:span><text:span text:style-name="T2">(64/13) </text:span> [ⲛⲓⲫ]ⲱ̣ⲥⲧⲏⲣ̣ ⲉⲁⲩⲣ̅ϣⲟ[ⲣ̅ⲡ̅’̅ ⲛ̅{ⲉⲓ}] <text:line-break/><text:span text:style-name="T1"> </text:span><text:span text:style-name="T2">(64/14) </text:span> [ⲉⲃ]ⲟⲗ ⲛ̅ϭ̣ⲓ ϩ̣ⲉⲛⲇⲓⲁⲕⲱ̣[‐ⲛ ⲡⲓϣⲟ]‐ <text:line-break/><text:span text:style-name="T1"> </text:span><text:span text:style-name="T2">(64/15) </text:span> [ⲣ̅ⲡ̅’̅] ⲛ̅ⲛⲟϭ ⲕⲁⲙⲁⲗⲓⲏ[ⲗ ⲛ̅ⲧⲉ ⲡⲓ]‐ <text:line-break/><text:span text:style-name="T1"> </text:span><text:span text:style-name="T2">(64/16) </text:span> [ⲛⲟϭ] ⲙ̅ⲫⲱⲥⲧⲏⲣ [ⲁ̅ⲣ̅ⲙ̅ⲟ̅ⲍ̅ⲏ̅ⲗ̅·] <text:line-break/><text:span text:style-name="T1"> </text:span><text:span text:style-name="T2">(64/17) </text:span> ⲙ̅[̅ⲛ̅] ⲡⲓⲛⲟϭ ⲅ̅ⲁⲃⲣⲓⲏ̅[ⲗ ⲛ̅ⲧⲉ ⲡⲓⲛⲟϭ] <text:line-break/><text:span text:style-name="T1"> </text:span><text:span text:style-name="T2">(64/18) </text:span> ⲙ̅ⲙⲉϩⲥⲛⲁⲩ ⲙ̅ⲫⲱ̣[ⲥⲧⲏⲣ ⲟ̅ⲣ̅ⲟ̅ⲓ̅̈̅ⲁ̅ⲏ̅ⲗ̅·] <text:line-break/><text:span text:style-name="T1"> </text:span><text:span text:style-name="T2">(64/19) </text:span> ⲡⲓⲛⲟϭ ⲥ̅ⲁ̅ⲙ̅ⲃ̅ⲗ̅ⲱ̣̅̅ ⲛ̅[ⲧⲉ ⲡⲓⲛⲟϭ] <text:line-break/><text:span text:style-name="T1"> </text:span><text:span text:style-name="T2">(64/20) </text:span> ⲙ̅ⲙⲉϩϣⲟⲙ̅ⲧ̅’̅ ⲙ̅ⲫⲱ̣[ⲥⲧⲏⲣ] <text:line-break/><text:span text:style-name="T1"> </text:span><text:span text:style-name="T2">(64/21) </text:span> ⲇ̅ⲁ̅ⲩ̅ⲉ̅ⲓ̅ⲑ̅ⲉ̅ · ⲁ̅ⲃⲣⲁⲥⲁⲝ̅ ⲙ̣̅[ⲡⲓⲛⲟϭ] <text:line-break/><text:span text:style-name="T1"> </text:span><text:span text:style-name="T2">(64/22) </text:span> [ⲙ̅]ⲙⲉϩϥⲧⲟⲟⲩ ⲙ̅ⲫⲱ̣[ⲥⲧⲏⲣ] <text:line-break/><text:span text:style-name="T1"> </text:span><text:span text:style-name="T2">(64/23) </text:span> [ⲏ̅ⲗ̅]̅ⲏ̣̅̅ⲗ̅ⲏ̅ⲑ̅ · ⲁⲩⲱ ⲁⲩ{ⲉ[ⲓ} ⲉⲃⲟⲗ ⲛ̅ϭⲓ] <text:line-break/><text:span text:style-name="T1"> </text:span><text:span text:style-name="T2">(64/24) </text:span> [ϩⲉⲛ]ⲥ̣ⲩⲛⲍⲩⲅⲟⲥ ϩ̅ⲛ̅ ⲟ̣[ⲩϯ] <text:line-break/><text:span text:style-name="T1"> </text:span><text:span text:style-name="T2">(64/25) </text:span> [ⲙⲉⲧ]ⲉ̣ ⲛ̣̅ⲧⲱⲟⲩ ⲛ̅ⲧⲉ ⲡ[ⲓⲱⲧ’] <text:line-break/><text:span text:style-name="T1"> </text:span><text:span text:style-name="T2">(64/26) </text:span> [ⲡⲓⲙⲉⲉⲩ]ⲉ ⲙ̅ⲡⲓϣⲟⲣ̣̅̅[̅ⲡ̅’̅ ⲛ̅ⲛⲟϭ] <text:line-break/><text:span text:style-name="T1"> </text:span><text:span text:style-name="T2">(64/27) </text:span> [ⲅ̅ⲁ̅ⲙ̅ⲁ̅ⲗ̅ⲓ̅]̅ⲏ̅ⲗ̅ · ⲧⲁⲅⲁⲡ̣[ⲏ ⲙ̅ⲡⲓⲙⲉϩ]‐ <text:line-break/><text:span text:style-name="T1"> </text:span><text:span text:style-name="T2">(64/28) </text:span> [ⲥⲛⲁⲩ] ⲛ̣̅ⲛⲟϭ ⲅ̅ⲁ̅ⲃ̅ⲣ̅ⲓ̅ⲏ̅[̅ⲗ̅· ϯⲣⲏⲛⲏ] <text:line-break/><text:span text:style-name="T1"> </text:span><text:span text:style-name="T2">(64/29) </text:span> [ⲙ̅ⲡⲓ]ⲛ̣ⲟϭ ⲙ̅ⲙⲉϩϣ̣[ⲟⲙ̅ⲧ̅’̅ ⲥⲁⲙⲃⲗⲱ]‐ <text:line-break/><text:span text:style-name="T1"> </text:span><text:span text:style-name="T2">(65/1) </text:span> ⲡⲱⲛ̅ϩ̅ ⲛ̅ϣⲁ ⲉⲛⲉϩ ⲙ̅ⲡⲛ̣ⲟ̣[ϭ ⲙ̅ⲙⲉϩ]‐ <text:line-break/><text:span text:style-name="T1"> </text:span><text:span text:style-name="T2">(65/2) </text:span> ϥⲧⲟⲟⲩ ⲁ̅ⲃ̅ⲣ̅ⲁ̅ⲥ̅ⲁ̅ⲝ̅ · ⲁⲩⲱ ⲛ̅ϯϩ[ⲉ ⲁⲩ]‐ <text:line-break/><text:span text:style-name="T1"> </text:span><text:span text:style-name="T2">(65/3) </text:span> ϫⲱⲕ ⲉⲃⲟⲗ ⲛ̅ϭⲓ ϯϯⲉ ⲛ̅ⲟⲅⲇ[ⲟⲁⲥ] <text:line-break/><text:soft-page-break/><text:span text:style-name="T1"> </text:span><text:span text:style-name="T2">(65/4) </text:span> ϯⲁⲛϩⲙⲉ ⲉⲧ’ϫⲏⲕ̣ ⲉⲃⲟⲗ · ϯ̣[ϭⲟⲙ] <text:line-break/><text:span text:style-name="T1"> </text:span><text:span text:style-name="T2">(65/5) </text:span> ⲛ̅ⲛⲁⲧ̅ⲣ̅ϩⲉⲣⲙⲏⲛ[ⲉⲩ]ⲉ ⲙ̅ⲙ[ⲟⲥ· ⲧⲟ]‐ <text:line-break/><text:span text:style-name="T1"> </text:span><text:span text:style-name="T2">(65/6) </text:span> [ⲧ]ⲉ̣ ⲡⲓⲛⲟϭ ⲛ̅ϣⲁϫⲉ ⲛ̅ⲁⲩⲧ[ⲟⲅⲉⲛⲏⲥ] <text:line-break/><text:span text:style-name="T1"> </text:span><text:span text:style-name="T2">(65/7) </text:span> [ⲙ]ⲛ̣̅ ⲡⲓⲡⲗⲏⲣⲱⲙⲁ ⲧⲏⲣ̅ϥ̅ ⲛ̅[ⲧⲉ ⲡⲓ]‐ <text:line-break/><text:span text:style-name="T1"> </text:span><text:span text:style-name="T2">(65/8) </text:span> [ϥⲧⲟⲟ]ⲩ ⲙ̅ⲫⲱⲥⲧⲏⲣ · ⲁⲩ[ⲉⲓⲛⲉ] <text:line-break/><text:span text:style-name="T1"> </text:span><text:span text:style-name="T2">(65/9) </text:span> [ⲉϩⲣ]ⲁⲓ̈ ⲛ̅ⲟ̣ⲩⲥⲙⲟⲩ ⲙ̅ⲡⲓⲛ[ⲟϭ ⲛ̅]‐ <text:line-break/><text:span text:style-name="T1"> </text:span><text:span text:style-name="T2">(65/10) </text:span> [ⲁⲧⲛⲁⲩ] ⲉ̣ⲣ̣[ⲟϥ] ⲁⲩⲱ ⲛ̅ⲁⲧ’̣[ϫⲁϩⲙ̅ϥ̅] <text:line-break/><text:span text:style-name="T1"> </text:span><text:span text:style-name="T2">(65/11) </text:span> [ⲛ̅ⲁⲧ’ϯ] ⲣ̣ⲁ̣[ⲛ] ⲉⲣⲟϥ ⲙ̅ⲡⲁⲣ̣[ⲑⲉⲛⲓⲕⲟⲛ] <text:line-break/><text:span text:style-name="T1"> </text:span><text:span text:style-name="T2">(65/12) </text:span> [ⲙ̅ⲡ̅ⲛ̅]̅ⲁ̅ ⲙ̅ⲛ̅ ϯϩⲟⲟⲩⲧ’ ⲙ̅ⲡ[ⲁⲣⲑⲉ]‐ <text:line-break/><text:span text:style-name="T1"> </text:span><text:span text:style-name="T2">(65/13) </text:span> [ⲛⲟⲥ] ⲙ̣̅̅ⲛ̣̅̅ ⲛ̣ⲓⲛⲟϭ ⲛ̅ⲛⲉⲱⲛ ⲛ̅ⲇ̣[ⲟⲝⲟ]‐ <text:line-break/><text:span text:style-name="T1"> </text:span><text:span text:style-name="T2">(65/14) </text:span> [ⲙⲉⲇⲱⲛ] ⲙ̅ⲛ̅ ⲛⲓⲑⲣⲟⲛⲟⲥ ⲉⲧ̅[ⲛ̅] <text:line-break/><text:span text:style-name="T1"> </text:span><text:span text:style-name="T2">(65/15) </text:span> [ϩⲣⲁⲓ̈ ⲛ̅ϩⲏⲧ]ⲟ̣ⲩ ⲙ̅ⲛ̅ ⲛⲓϭⲟⲙ ⲉⲧⲕ[ⲱ]‐ <text:line-break/><text:span text:style-name="T1"> </text:span><text:span text:style-name="T2">(65/16) </text:span> [ⲧⲉ ⲉⲣⲟⲟ]ⲩ ⲙ̅ⲛ̅ ϩⲉⲛⲉⲟⲟⲩ ⲙ̅[ⲛ̅ ϩⲉⲛ]‐ <text:line-break/><text:span text:style-name="T1"> </text:span><text:span text:style-name="T2">(65/17) </text:span> [ϭⲟⲙ ⲙ̅]̅ⲛ̣̅̅ ϩ[ⲉⲛ]ⲉⲝⲟⲩⲥⲓⲁ ̅ⲙⲛ̅ ⲡ̣ϣ̅ⲙ[ⲧ’̅] <text:line-break/><text:span text:style-name="T1"> </text:span><text:span text:style-name="T2">(65/18) </text:span> [ϩⲟⲟⲩⲧ’ ⲛ̅ⲁⲗ]ⲟ̣ⲩ ⲙ̅ⲛ̅ ϯϩⲟⲟⲩⲧ’ ⲙ̅‐ <text:line-break/><text:span text:style-name="T1"> </text:span><text:span text:style-name="T2">(65/19) </text:span> [ⲡⲁⲣⲑⲉⲛⲟⲥ] ⲓ̅̈̅ⲟ̅ⲩ̅ⲏ̣̅̅ⲗ̅ ⲙ̅ⲛ̅ ⲏ̅ⲥⲏⲫⲏⲭ̅ <text:line-break/><text:span text:style-name="T1"> </text:span><text:span text:style-name="T2">(65/20) </text:span> [ⲡⲓⲣⲉϥⲁⲙⲁϩ]ⲧ̣ⲉ ⲙ̅ⲡⲉⲟⲟⲩ ⲙ̅ⲛ̅ <text:line-break/><text:span text:style-name="T1"> </text:span><text:span text:style-name="T2">(65/21) </text:span> [ⲡⲓⲕⲗⲟⲙ ⲛ̅ⲧⲉ] ⲡⲉϥⲉⲟⲟⲩ ⲙ̅ⲛ̅ <text:line-break/><text:span text:style-name="T1"> </text:span><text:span text:style-name="T2">(65/22) </text:span> [ⲡⲓⲡⲗⲏⲣ]ⲱ̣ⲙⲁ ⲧⲏⲣ̅ϥ̅ ⲙ̅ⲛ̅ ⲛⲓⲉⲟⲟ̣[ⲩ] <text:line-break/><text:span text:style-name="T1"> </text:span><text:span text:style-name="T2">(65/23) </text:span> [ⲧⲏⲣⲟⲩ] ⲉⲧ̅ⲛ̅ϩⲣⲁⲓ̈ ϩ̅ⲛ̅ ⲛⲓⲡⲗⲏⲣ̣ⲱ̣[ⲙⲁ] <text:line-break/><text:span text:style-name="T1"> </text:span><text:span text:style-name="T2">(65/24) </text:span> [ⲛ̅ⲁⲧ’ϫⲓ]ⲟⲟⲣ ⲙ̅ⲙⲟ[ⲟⲩ] ⲙ̣[̅ⲛ̅ ⲛⲓ]‐ <text:line-break/><text:span text:style-name="T1"> </text:span><text:span text:style-name="T2">(65/25) </text:span> [ⲉⲱⲛ ⲛ̅ⲛ]ⲁ̣ⲧ’ϯ ⲣⲁⲛ ⲉⲣ[ⲟⲟⲩ {ϩ̅ⲓ}ⲛⲁ] <text:line-break/><text:span text:style-name="T1"> </text:span><text:span text:style-name="T2">(65/26) </text:span> [ⲛ̅ⲧⲟⲟⲩ] ⲛ̅ⲥⲉⲙⲟⲩⲧⲉ̣ [ⲉⲡⲓⲱⲧ’ ϫⲉ] <text:line-break/><text:span text:style-name="T1"> </text:span><text:span text:style-name="T2">(65/27) </text:span> [ⲡⲓⲙⲉϩⲇ̅] ⲙ̣̅̅ⲛ̅ ϯⲅⲉⲛⲉⲁ̣ [ⲛ̅ⲁⲧ’ⲕⲓⲙ] <text:line-break/><text:span text:style-name="T1"> </text:span><text:span text:style-name="T2">(65/28) </text:span> [ⲛ̅ⲁⲧ’ϫⲱϩ̅]̅ⲙ̅ ⲛ̅ⲧⲉ ⲡ[ⲓ]ⲱ[ⲧ’ ⲁⲩⲱ] <text:line-break/><text:span text:style-name="T1"> </text:span><text:span text:style-name="T2">(65/29) </text:span> [ⲛ̅ⲧⲟ]ⲟⲩ ⲛ̅ⲥⲉⲙⲟⲩⲧⲉ̣ [ⲉⲣⲟⲥ ϫⲉ] <text:line-break/><text:span text:style-name="T1"> </text:span><text:span text:style-name="T2">(65/30) </text:span> [ϯⲥ]ⲡ̣ⲟ̣ⲣ̣ⲁ ⲛ̅ⲧⲉ ⲡⲓⲛⲟϭ ⲥ̣[̅ⲏ̅ⲑ̅· ⲧⲟ]‐ <text:line-break/><text:span text:style-name="T1"> </text:span><text:span text:style-name="T2">(65/31) </text:span> [ⲧⲉ ⲁⲩⲕⲓ]ⲙ ⲛ̅ϭⲓ ⲛⲁⲓ̈ ⲧⲏⲣ̣[ⲟⲩ·] <text:line-break/><text:span text:style-name="T1"> </text:span><text:span text:style-name="T2">(66/1) </text:span> [ⲁⲩⲱ ⲟⲩϣ̅]̅ⲧ̅ⲣ̣̅̅ⲧ̅ⲣ̅ ⲁϥⲧⲁϩⲟ ⲛ̅ⲛⲓⲁⲧ’ <text:line-break/><text:span text:style-name="T1"> </text:span><text:span text:style-name="T2">(66/2) </text:span> [ϫⲱϩ̅]̅ⲙ̅ ϩⲟⲧⲁⲛ ⲉⲧⲁⲡⲓϣ̅ⲙⲧ’̅ ϩⲟⲟⲩⲧ’ <text:line-break/><text:span text:style-name="T1"> </text:span><text:span text:style-name="T2">(66/3) </text:span> [ⲛ̅ⲁⲗⲟ]ⲩ {ⲉ̅ⲓ} ⲉⲃⲟⲗ ⲛ̅ⲥⲁϩⲣⲁⲓ̈ ϣⲁϩⲣⲁⲓ̈ <text:line-break/><text:span text:style-name="T1"> </text:span><text:span text:style-name="T2">(66/4) </text:span> [ⲉⲛⲓⲁⲧ’]ⲙⲓⲥⲉ ⲙ̣̅̅ⲛ̣̅̅ ⲛⲓϫⲡⲟ ⲉⲃⲟⲗ ⲙ̅ⲙⲟ̣‐ <text:line-break/><text:span text:style-name="T1"> </text:span><text:span text:style-name="T2">(66/5) </text:span> [ⲟⲩ ⲙ]ⲁ̣ⲩ̣ⲁ̣[ⲁⲩ] ⲙ̣̅̅ⲛ̅ ⲉϩⲣⲁⲓ̈ ⲉⲛⲏ ⲉⲧ[ⲁⲩ] <text:line-break/><text:span text:style-name="T1"> </text:span><text:span text:style-name="T2">(66/6) </text:span> [ϫⲡⲟⲟ]ⲩ ⲉϩⲣⲁⲓ̈ ⲉⲡⲓϫⲡⲟ · ⲁϥ{ⲉ̅ⲓ} ⲉ̣[ⲃⲟⲗ] <text:line-break/><text:span text:style-name="T1"> </text:span><text:span text:style-name="T2">(66/7) </text:span> [ⲛ̅ϭⲓ ⲡⲓ]ⲛⲟϭ ⲡⲁ ⲛⲓⲙ̅ⲛ̅ⲧⲛⲟ[ϭ ⲧⲏⲣⲟⲩ] <text:line-break/><text:span text:style-name="T1"> </text:span><text:span text:style-name="T2">(66/8) </text:span> [ⲛ̅ⲧⲉ] ⲡ̣ⲓⲛⲟϭ ⲛ̅ⲭ̅ⲥ̅ · ⲁⲩⲱ ⲁϥⲧⲁϫ̣[ⲣⲟ] <text:line-break/><text:span text:style-name="T1"> </text:span><text:span text:style-name="T2">(66/9) </text:span> [ⲛ̅ϩⲉⲛ]ⲑⲣⲟⲛⲟⲥ ⲛ̅ⲧⲉ ⲡⲉ̣ⲟⲟⲩ [ϩ̅ⲙ̅] <text:line-break/><text:span text:style-name="T1"> </text:span><text:span text:style-name="T2">(66/10) </text:span> [ⲡⲓϥⲧⲟⲟⲩ] ⲛ̅ⲛⲉⲱⲛ̣ [ⲁⲩⲱ ⲛ̅ⲧⲁⲩ] <text:line-break/><text:span text:style-name="T1"> </text:span><text:span text:style-name="T2">(66/11) </text:span> [ⲕⲱⲧ]ⲉ [ⲉ]ⲣ̣ⲟⲟⲩ ⲛ̅ϭⲓ ϩⲉⲛⲁⲛ[ⲧⲃⲁ ⲛ̅]‐ <text:line-break/><text:span text:style-name="T1"> </text:span><text:span text:style-name="T2">(66/12) </text:span> [ϭⲟⲙ] ⲛ̅ⲁⲧ’ϯ ⲏⲡⲉ ⲉⲣⲟⲟⲩ · [ϩⲉⲛ]‐ <text:line-break/><text:span text:style-name="T1"> </text:span><text:span text:style-name="T2">(66/13) </text:span> [ⲉⲟ]ⲟⲩ ⲙ̅ⲛ̅ ϩ[ⲉ]ⲛⲁⲧ’ϫⲱϩ̅ⲙ̅ [ⲁⲩⲱ ⲛ̅ϯ]‐ <text:line-break/><text:span text:style-name="T1"> </text:span><text:span text:style-name="T2">(66/14) </text:span> [ϩⲉ] ⲁϥ{ⲉ̅ⲓ} ⲉⲃⲟⲗ̣ ⲁⲩⲱ ⲁⲥϫ[ⲓⲥⲉ ⲛ̅ϭⲓ ϯ] <text:line-break/><text:span text:style-name="T1"> </text:span><text:span text:style-name="T2">(66/15) </text:span> [ⲁⲧ’]ϫⲱϩ̅ⲙ̅· ϯⲡ̅ⲛⲁ̅ⲧ[ⲓⲕⲏ ⲛ̅ⲉⲕ]‐ <text:line-break/><text:span text:style-name="T1"> </text:span><text:span text:style-name="T2">(66/16) </text:span> [ⲕⲗⲏ]ⲥ̣ⲓ̣ⲁ ⲛ̅ϩⲣⲁⲓ̈ ϩ̅ⲙ̅ ⲡⲓϥⲧ̣[ⲟⲟⲩ ⲙ̅]‐ <text:line-break/><text:span text:style-name="T1"> </text:span><text:span text:style-name="T2">(66/17) </text:span> ⲫⲱ̣ⲥ̣ⲧⲏⲣ ⲛ̅ⲧⲉ ⲡⲓ̣[ⲛⲟϭ ⲛ̅ϣⲁϫⲉ] <text:line-break/><text:span text:style-name="T1"> </text:span><text:span text:style-name="T2">(66/18) </text:span> ⲛ̅ⲁⲩⲧⲟⲅ̣ⲉⲛⲏⲥ ⲉⲧ[ⲟⲛ̅ϩ̅ ⲡⲓⲛⲟⲩⲧⲉ] <text:line-break/><text:span text:style-name="T1"> </text:span><text:span text:style-name="T2">(66/19) </text:span> ⲛ̅ⲧⲉ ⲧ̣ⲙ̅ⲛ̅ⲧ̣ⲙⲉ· ⲉⲩ[ⲥⲙⲟⲩ ⲁⲩⲱ] <text:line-break/><text:soft-page-break/><text:span text:style-name="T1"> </text:span><text:span text:style-name="T2">(66/20) </text:span> ⲉⲩϩ̣ⲱ̣ⲥ ⲉⲩϯ ⲉⲟ̣[ⲟⲩ ϩ̅ⲛ̅ ⲟⲩⲥⲙⲏ] <text:line-break/><text:span text:style-name="T1"> </text:span><text:span text:style-name="T2">(66/21) </text:span> ⲧⲏⲣ̣ⲟⲩ ϩ̅ⲛ̅ ⲟⲩ{ϩⲓ}ⲕ̣ⲱ̣[ⲛ ⲛ̅ⲟⲩⲱⲧⲉ] <text:line-break/><text:span text:style-name="T1"> </text:span><text:span text:style-name="T2">(66/22) </text:span> ϩ̣̅̅ⲛ̅ ⲟⲩ̣ϩ̣ⲣⲟⲟⲩ ⲛ̅ⲁⲧ’ⲕⲁⲣⲱ̣[ϥ ⲙ̅ⲡⲓⲱⲧ’] <text:line-break/><text:span text:style-name="T1"> </text:span><text:span text:style-name="T2">(66/23) </text:span> ⲙ̅ⲛ̣̅̅ ⲧⲙⲁⲁⲩ ⲙ̅ⲛ̅ ⲡϣⲏⲣ[ⲉ ⲙ̅ⲛ̅ ⲡⲓ]‐ <text:line-break/><text:span text:style-name="T1"> </text:span><text:span text:style-name="T2">(66/24) </text:span> [ϫⲱ]ⲕ [ⲉⲃⲟ]ⲗ̣ ⲉⲧ̅ⲛ̅ⲧⲁⲩ· [ⲛ̅ⲑⲉ ⲉⲛ]‐ <text:line-break/><text:span text:style-name="T1"> </text:span><text:span text:style-name="T2">(66/25) </text:span> [ⲧⲁⲓ̈ⲣ̅ϣⲟⲣ̅ⲡ̅’̅ ⲛ̅ϫⲟⲟϥ ⲉ..[.ϯϯⲉ ⲛ̅]‐ <text:line-break/><text:span text:style-name="T1"> </text:span><text:span text:style-name="T2">(66/26) </text:span> [ⲥⲫⲣⲁⲅⲓⲥ] ⲉⲧ’ⲕⲏ ⲉϩⲣⲁⲓ̈ [ⲉϫ̅ⲛ̅ ⲛⲓ] <text:line-break/><text:span text:style-name="T1"> </text:span><text:span text:style-name="T2">(66/27) </text:span> [ⲁⲛⲧⲃⲁ] ⲙ̣̅̅ⲛ̣̅̅ ⲛⲏ ⲉⲧ’[ⲣ̅ⲁⲣⲭⲓ ⲉϩⲣⲁⲓ̈] <text:line-break/><text:span text:style-name="T1"> </text:span><text:span text:style-name="T2">(66/28) </text:span> [ⲉϫ̅ⲛ̅ ⲛⲓⲉ]ⲱⲛ ⲙ̅ⲛ̅ ⲛⲓⲥ̣[ⲁ]ϯ̣ⲅ̣ⲟ[ⲥ ⲛⲏ] <text:line-break/><text:span text:style-name="T1"> </text:span><text:span text:style-name="T2">(66/29) </text:span> [ⲉⲧ̅ⲣ̅ⲫⲟ]ⲣⲓ ⲙ̅ⲡⲉⲟⲟⲩ ⲉⲁⲩϯ̣ <text:line-break/><text:span text:style-name="T1"> </text:span><text:span text:style-name="T2">(66/30) </text:span> [ⲛⲁⲩ ⲙ̅]ⲡⲟⲩⲁϩ ⲥⲁϩⲛⲉ [ⲉⲟⲩⲱⲛ̅ϩ̅] <text:line-break/><text:span text:style-name="T1"> </text:span><text:span text:style-name="T2">(67/1) </text:span> ⲉⲃⲟⲗ ⲛ̅ⲛⲏ ⲉⲧ̅ⲙ̅ⲡϣ[ⲁ] ϩ[ⲁⲙⲏⲛ·] <text:line-break/><text:span text:style-name="T1"> </text:span><text:span text:style-name="T2">(67/2) </text:span> ⲧⲟⲧⲉ ⲡⲓⲛⲟϭ ⲥ̅ⲏ̅ⲑ̅ ⲡϣⲏⲣⲉ [ⲛ̅ⲧⲉ ⲡⲓ]‐ <text:line-break/><text:span text:style-name="T1"> </text:span><text:span text:style-name="T2">(67/3) </text:span> ⲁⲧ’ϫⲱϩ̅ⲙ̅ ⲛ̅ⲣⲱⲙⲉ ⲁ[ⲇ]ⲁⲙ[ⲁⲥ ⲁϥⲉⲓ]‐ <text:line-break/><text:span text:style-name="T1"> </text:span><text:span text:style-name="T2">(67/4) </text:span> ⲛⲉ ⲉϩⲣⲁⲓ̈ ⲛ̅ⲟⲩⲥ̣[ⲙⲟⲩ] ⲙ̅ⲡ[ⲓⲛⲟϭ ⲛ̅]‐ <text:line-break/><text:span text:style-name="T1"> </text:span><text:span text:style-name="T2">(67/5) </text:span> ⲛ̣ⲁⲧⲛⲁⲩ ⲉⲣⲟ[ϥ ⲁⲩⲱ ⲛ̅ⲁⲧ’ϫⲁϩⲙϥ] <text:line-break/><text:span text:style-name="T1"> </text:span><text:span text:style-name="T2">(67/6) </text:span> [ⲁⲩ]ⲱ ⲛ̅[ⲁ]ⲧ’ϯ ⲣⲁⲛ ⲉⲣⲟϥ [ⲙ̅ⲡⲁⲣⲑⲉⲛⲓ]‐ <text:line-break/><text:span text:style-name="T1"> </text:span><text:span text:style-name="T2">(67/7) </text:span> [ⲕⲟⲛ ⲙ̅]ⲡⲛ̅ⲁ̅ ⲙ̅ⲛ̅ ϯϩⲟⲟⲩ̣[ⲧ’ ⲙ̅ⲡⲁⲣ]‐ <text:line-break/><text:span text:style-name="T1"> </text:span><text:span text:style-name="T2">(67/8) </text:span> [ⲑⲉⲛⲟ]ⲥ ⲙ̅ⲛ̅ ⲡⲓϣ̅ⲙⲧ’̅ ϩⲟⲟ̣[ⲩⲧ’ ⲛ̅ⲁⲗⲟⲩ] <text:line-break/><text:span text:style-name="T1"> </text:span><text:span text:style-name="T2">(67/9) </text:span> [ⲙⲛ̅ ϯ]ϩⲟⲟⲩ̣ⲧ’ ⲙ̣̅ⲡ̣ⲁⲣⲑ̣[ⲉⲛⲟⲥ ⲓ̈ⲟⲩⲏⲗ] <text:line-break/><text:span text:style-name="T1"> </text:span><text:span text:style-name="T2">(67/10) </text:span> [ ]..[ <text:line-break/><text:span text:style-name="T1"> </text:span><text:span text:style-name="T2">(67/11) </text:span> (lines 11 and following are missing) <text:line-break/><text:span text:style-name="T1"> </text:span><text:span text:style-name="T2">(67/12) </text:span> [ ]ⲛ̣[ <text:line-break/><text:span text:style-name="T1"> </text:span><text:span text:style-name="T2">(67/13) </text:span> [ ]ⲧⲉ ⲙ̅ⲡ[ <text:line-break/><text:span text:style-name="T1"> </text:span><text:span text:style-name="T2">(67/14) </text:span> [ ]ⲙ̣ⲉ ϩⲏⲧ .[ ⲉⲃⲟⲗ] <text:line-break/><text:span text:style-name="T1"> </text:span><text:span text:style-name="T2">(67/15) </text:span> [{ϩ̅ⲓ}ⲧⲟⲟⲧ̅ϥ̅] ⲙ̅ⲡⲓⲛⲟ[ϭ ⲛ̅ⲥⲏⲑ· ⲁϥ]‐ <text:line-break/><text:span text:style-name="T1"> </text:span><text:span text:style-name="T2">(67/16) </text:span> [ⲧⲉⲗⲏⲗ ⲉϩⲣ] ⲁⲓ̈ [ⲉ]ϫ̅ⲛ̅ ⲡⲓϩ̣[ⲙⲟⲧ’ ⲉⲧ]‐ <text:line-break/><text:span text:style-name="T1"> </text:span><text:span text:style-name="T2">(67/17) </text:span> [ⲁⲩ....]ⲧ’ ⲙ̅ⲙⲟϥ ⲛ[ⲁϥ ⲉⲃⲟⲗ {ϩ̅ⲓ}] <text:line-break/><text:span text:style-name="T1"> </text:span><text:span text:style-name="T2">(67/18) </text:span> [ⲧⲟⲟⲧ̅ϥ̅] ⲙ̣̅ⲡ̣[ⲓⲁ]ⲧ’ϫⲱϩ̅[ⲙ̅ ⲛ̅ⲁⲗⲟⲩ] <text:line-break/><text:span text:style-name="T1"> </text:span><text:span text:style-name="T2">(67/19) </text:span> [ⲉϫⲓ ⲧⲉϥ]ⲥⲡ[ⲟⲣⲁ] ϩ̣̅̅ⲛ̅ [ ] <text:line-break/><text:span text:style-name="T1"> </text:span><text:span text:style-name="T2">(68/1) </text:span> [ ] ϯⲡⲁⲣⲑⲉⲛⲟⲥ ⲧⲁ <text:line-break/><text:span text:style-name="T1"> </text:span><text:span text:style-name="T2">(68/2) </text:span> [ⲛ̅ⲕⲓⲃⲉ ⲇ̅] ⲉⲧ̣ⲁϥⲧⲁϩⲟⲥ ⲉⲣⲁⲧ̅ⲥ̅ ⲛ̅ⲙ̅ <text:line-break/><text:span text:style-name="T1"> </text:span><text:span text:style-name="T2">(68/3) </text:span> [ⲙⲁϥ ϩ̅ⲙ̅] ⲡ̣ⲓ̣ϥⲧⲟⲟⲩ ⲛ̅ⲛⲉⲱⲛ ϩ̅ⲙ̅ ⲡⲓ‐ <text:line-break/><text:span text:style-name="T1"> </text:span><text:span text:style-name="T2">(68/4) </text:span> [ⲛⲟϭ ⲙ̅]ⲙ̣ⲉ[ϩ]ϣ[ⲟ]ⲙⲉⲧ’ ⲙ̅ⲫⲱⲥⲧⲏⲣ <text:line-break/><text:span text:style-name="T1"> </text:span><text:span text:style-name="T2">(68/5) </text:span> [ⲇ̅ⲁ̅ⲩ̅ⲉ̅ⲓ̅]̅ⲑ̅ⲉ̣̅̅ [ⲁⲗⲗⲁ] ⲙ̅ⲛ̅ⲛ̅ⲥⲁ ϯⲟⲩ ⲛ̅‐ <text:line-break/><text:span text:style-name="T1"> </text:span><text:span text:style-name="T2">(68/6) </text:span> [ϣⲟ ⲛ̅ⲣⲟⲙⲡⲉ ⲡⲉϫ]ⲁϥ ⲛ̅ϭ̣ⲓ̣ ⲡⲓⲛⲟ̣[ϭ] <text:line-break/><text:span text:style-name="T1"> </text:span><text:span text:style-name="T2">(68/7) </text:span> [ⲙ̅ⲫⲱⲥⲧⲏ]ⲣ̣ ⲏ̅ⲗ̣̅̅ⲏ̅ⲗ̅ⲏ̣̅̅ⲑ̅ ϫⲉ ⲙ[ⲁ]ⲣⲉ̣[ⲟⲩ] <text:line-break/><text:span text:style-name="T1"> </text:span><text:span text:style-name="T2">(68/8) </text:span> [ⲟⲛ ⲣ̅ ⲣ̅ⲣⲟ] ⲉϩⲣⲁⲓ̈ ⲉϫ̅ⲛ̅ ⲡⲭⲁⲟ̣[ⲥ ⲙ̅ⲛ̅] <text:line-break/><text:span text:style-name="T1"> </text:span><text:span text:style-name="T2">(68/9) </text:span> [ⲁⲙ̅ⲛ̅ⲧⲉ· ⲁ]ⲩⲱ ⲁ̣{ⲉⲓ} ⲉⲃⲟ̣ⲗ ⲛ̅ϭⲓ ⲟ[ⲩ]‐ <text:line-break/><text:span text:style-name="T1"> </text:span><text:span text:style-name="T2">(68/10) </text:span> [ⲕⲗⲟⲟⲗⲉ...]ⲧ[ <text:line-break/><text:span text:style-name="T1"> </text:span><text:span text:style-name="T2">(68/11) </text:span> [ ]̅ϭ̅ ⲁⲥ̣ϫ̣.[ <text:line-break/><text:span text:style-name="T1"> </text:span><text:span text:style-name="T2">(68/12) </text:span> [ ⲥ̅]̅ⲛ̅ⲧⲉ ⲛ̅ⲧ[ <text:line-break/><text:span text:style-name="T1"> </text:span><text:span text:style-name="T2">(68/13) </text:span> [ ] ⲙ̣̅ⲡⲓⲕⲟⲩ[ <text:line-break/><text:span text:style-name="T1"> </text:span><text:span text:style-name="T2">(68/14) </text:span> [ ]ⲛ ⲡⲏ [ⲉ]ⲧⲁ[ⲥⲧⲁϩⲟϥ ⲉ]‐ <text:line-break/><text:span text:style-name="T1"> </text:span><text:span text:style-name="T2">(68/15) </text:span> [ⲣⲁⲧ̅ϥ̅ ]{ⲉⲓ} ⲉⲃⲟⲗ [ⲉ]ⲃⲟⲗ̣ [ϩⲛ̅ ] <text:line-break/><text:span text:style-name="T1"> </text:span><text:span text:style-name="T2">(68/16) </text:span> [ ]ⲉⲡⲓ [....]..[ <text:line-break/><text:span text:style-name="T1"> </text:span><text:span text:style-name="T2">(69/1) </text:span> ⲛ̅ϭⲓ ⲥ̅ⲁ̅ⲕ̅ⲗ̅ⲁ̅ ⲡⲓⲛⲟϭ [ⲛ̅ⲁⲅⲅⲉⲗⲟⲥ ⲉ]‐ <text:line-break/><text:soft-page-break/><text:span text:style-name="T1"> </text:span><text:span text:style-name="T2">(69/2) </text:span> ⲡⲏ ⲉⲧ̅ⲛ̅ⲙ̅ⲙⲁϥ ⲛ̅ⲉⲃⲣ̣[ⲟⲩⲏⲗ̅ ⲡⲓⲛⲟϭ ⲛ̅]‐ <text:line-break/><text:span text:style-name="T1"> </text:span><text:span text:style-name="T2">(69/3) </text:span> ⲇⲉⲙⲱⲛ· ⲁⲩⲱ ⲁ̣[ⲩϣⲱⲡⲉ ⲛ̅ⲙ̅ⲙⲁⲩ ⲛ̅]‐ <text:line-break/><text:span text:style-name="T1"> </text:span><text:span text:style-name="T2">(69/4) </text:span> ⲟⲩⲡ̅ⲛ̅ⲁ̅ ⲛ̅ϫⲡⲟ̣ [ⲛ̅ⲧⲉ ⲡⲕⲁϩ· ⲡⲓⲙ̅ⲛ̅ⲧ̅ⲥ̅ⲛⲟ]‐ <text:line-break/><text:span text:style-name="T1"> </text:span><text:span text:style-name="T2">(69/5) </text:span> ⲟⲩⲥ̣ ⲛ̅ⲁ̣[ⲅ]ⲅⲉⲗⲟⲥ <text:line-break/><text:span text:style-name="T1"> </text:span><text:span text:style-name="T2">(69/6) </text:span> (lines 6 and following are missing) <text:line-break/><text:span text:style-name="T1"> </text:span><text:span text:style-name="T2">(70/1) </text:span> [..ⲡⲉⲧⲟⲩⲙ]ⲟⲩⲧⲉ ⲉⲣⲟϥ ⲛ̅ϭⲓ ⲛ̅ⲅⲉ‐ <text:line-break/><text:span text:style-name="T1"> </text:span><text:span text:style-name="T2">(70/2) </text:span> [ⲛⲉⲁ ⲧⲏⲣⲟⲩ] ⲛ̅ⲧⲉ ⲛⲓⲣⲱⲙⲉ ϫⲉ ⲡⲣⲏ· <text:line-break/><text:span text:style-name="T1"> </text:span><text:span text:style-name="T2">(70/3) </text:span> [ⲡⲙⲉϩⲥⲁϣ̅ϥ̅ ⲁ̅ⲃⲉⲗ̅]· ⲡⲙⲉϩϣⲙⲟⲩⲛ <text:line-break/><text:span text:style-name="T1"> </text:span><text:span text:style-name="T2">(70/4) </text:span> [ⲁ̅ⲕ̅ⲓ̅ⲣ̅ⲉ̅ⲥ̅ⲥ̅ⲓ̅ⲛ̅ⲁ̅· ⲡⲙⲉϩ]ⲯⲉⲓⲧ’ ⲓ̅̈ⲟⲩⲃⲏⲗ̣̅ <text:line-break/><text:span text:style-name="T1"> </text:span><text:span text:style-name="T2">(70/5) </text:span> [ⲡⲙⲉϩⲙⲏⲧ’ ̅ϩ̅ⲁ̅ⲣ̅ⲙ̅ⲟ̅]̅ⲩ̣̅̅ⲡ̣̅̅[̅ⲓ̅ⲁ̅ⲏ̅ⲗ̅·] ⲡⲙ[ⲉϩ] <text:line-break/><text:span text:style-name="T1"> </text:span><text:span text:style-name="T2">(70/6) </text:span> (lines 6 and following are missing) <text:line-break/><text:span text:style-name="T1"> </text:span><text:span text:style-name="T2">(71/1) </text:span> ⲡⲏ ⲉⲧⲁϥⲥⲟⲧ̅ⲥ̅ ⲉϩⲣⲁⲓ̈ ⲉⲛⲓⲉⲱⲛ ⲛ̅ϫⲡⲟ <text:line-break/><text:span text:style-name="T1"> </text:span><text:span text:style-name="T2">(71/2) </text:span> ⲛ̅ⲕⲁϩ {ϩ̅ⲓ}ⲛⲁ ⲉⲧⲃⲏⲏⲧ̅ⲥ̅ ⲛ̅ⲥⲉϫⲱⲕ ⲛ̅ϭ[ⲓ] <text:line-break/><text:span text:style-name="T1"> </text:span><text:span text:style-name="T2">(71/3) </text:span> ⲛⲓϩⲁⲉⲟⲩ· ⲧⲏ [ⲅⲁ]ⲣ ⲉⲧⲁⲥ{ⲉ̅ⲓ} ⲉⲡⲉⲥⲏⲧ’ <text:line-break/><text:span text:style-name="T1"> </text:span><text:span text:style-name="T2">(71/4) </text:span> ⲉⲃⲟⲗ ϩ̅ⲙ̅ ⲡϫⲓⲥⲉ ⲉϩⲣⲁⲓ̈ ⲉⲡⲕⲟⲥⲙ[ⲟⲥ] <text:line-break/><text:span text:style-name="T1"> </text:span><text:span text:style-name="T2">(71/5) </text:span> ⲛ̅ⲉⲓⲛⲉ ⲛ̅ⲟⲩϣⲏ ⲉⲁ..[.]ⲁⲥ ⲁⲥⲉ{[̅ⲓ} ⲉⲉ]‐ <text:line-break/><text:span text:style-name="T1"> </text:span><text:span text:style-name="T2">(71/6) </text:span> [ⲣ]ⲏⲧ’· ⲁⲩⲱ ⲙ̅ⲛ̅ ⲛ̅ⲥⲁ ⲧⲥ̣ⲡⲟⲣⲁ ⲛ̅[ⲧⲉ] <text:line-break/><text:span text:style-name="T1"> </text:span><text:span text:style-name="T2">(71/7) </text:span> [ⲡ]ⲁ̣ⲣⲭⲱⲛ ⲛ̅ⲧⲉ ⲡⲉⲓ̈ⲁⲓⲱⲛ [ⲁ]ⲩⲱ ⲛⲓ[ⲉⲃⲟⲗ] <text:line-break/><text:span text:style-name="T1"> </text:span><text:span text:style-name="T2">(71/8) </text:span> [ⲙ̅ⲙ]ⲟϥ [ⲧ]ⲏ ⲉⲧ’ⲥⲟⲟϥ ⲁⲩⲱ [ⲉ]ⲧ’̣[ⲧⲁⲕ] <text:line-break/><text:span text:style-name="T1"> </text:span><text:span text:style-name="T2">(71/9) </text:span> [ⲏⲩ]ⲧ’̣ ⲛ̅ⲧⲉ ⲡⲓⲛⲟⲩⲧⲉ ⲛ̅ϭ.[ ] <text:line-break/><text:span text:style-name="T1"> </text:span><text:span text:style-name="T2">(71/10) </text:span> [ⲁⲩⲱ ⲙ̅ⲛ̅ ⲛ̅ⲥⲁ] ⲧⲥⲡⲟⲣⲁ ⲛ̅ⲁ[ⲇⲁⲙ ⲡⲣⲏ] <text:line-break/><text:span text:style-name="T1"> </text:span><text:span text:style-name="T2">(71/11) </text:span> [ⲙ̅ⲛ̅ ⲥ̅ⲏⲑ̅ ⲡⲓⲛ]ⲟ̣ϭ· ⲧⲟⲧⲉ ⲁϥⲉ{[ⲓ} ⲉⲃⲟⲗ] ⲛ̣̅ϭⲓ <text:line-break/><text:span text:style-name="T1"> </text:span><text:span text:style-name="T2">(71/12) </text:span> [ⲡⲓⲛⲟϭ ⲛ̅]ⲁⲅ̣ⲅⲉ̣ⲗⲟⲥ ϩⲟⲣⲙⲟⲥ ⲉⲥ̣[ⲟ]ⲃⲧⲉ <text:line-break/><text:span text:style-name="T1"> </text:span><text:span text:style-name="T2">(71/13) </text:span> [ⲉⲃⲟⲗ {ϩ̅ⲓ}ⲧⲟⲟⲧ]ⲟⲩ ⲛ̅ⲛⲓⲡⲁⲣⲑⲉⲛⲟⲥ <text:line-break/><text:span text:style-name="T1"> </text:span><text:span text:style-name="T2">(71/14) </text:span> [ⲛ̅ⲧⲉ ⲧⲥⲡⲟⲣ]ⲁ ⲉⲧ[ϫⲁϩ̅ⲙ̅ ⲛ̅ⲧⲉ ⲡⲉⲓ̈ⲁⲓⲱ̣[ⲛ] <text:line-break/><text:span text:style-name="T1"> </text:span><text:span text:style-name="T2">(71/15) </text:span> [ϩ̅ⲛ̅ ⲟⲩⲥⲕⲉ]ⲟⲩⲥ ⲛ̅ϫⲡⲟ ⲛ̅ϣ̣ⲁϫⲉ ⲉϥ <text:line-break/><text:span text:style-name="T1"> </text:span><text:span text:style-name="T2">(71/16) </text:span> [ⲟⲩⲁⲁⲃ ⲉⲃⲟⲗ ϩ̅]̅ⲓ̣̅̅ⲧⲟⲟⲧ̅ϥ̅ ⲙ̅ⲡ̣̅[ⲡ̅]ⲛⲁ̅ ⲉ‐ <text:line-break/><text:span text:style-name="T1"> </text:span><text:span text:style-name="T2">(71/17) </text:span> [ⲧⲟⲩⲁⲁⲃ ⲛ̅ⲧⲥ]ⲡⲟⲣⲁ ⲛ̅ⲧⲉ̣ [ⲡ]ⲓ̣ⲛⲟϭ <text:line-break/><text:span text:style-name="T1"> </text:span><text:span text:style-name="T2">(71/18) </text:span> [ⲛ̅ⲥ̅ⲏ̅ⲑ̅· ⲧⲟⲧ]ⲉ ⲡⲓⲛⲟϭ ⲥ̅ⲏ[ⲑ̅ ⲁϥ]{ⲉⲓ} <text:line-break/><text:span text:style-name="T1"> </text:span><text:span text:style-name="T2">(71/19) </text:span> [ⲁϥⲉⲓⲛⲉ ⲛ̅ⲧⲉ]ϥⲥⲡⲟⲣⲁ ⲁ[ⲩⲱ ⲁ]ϥⲥⲁ‐ <text:line-break/><text:span text:style-name="T1"> </text:span><text:span text:style-name="T2">(71/20) </text:span> [ⲧ̅ⲥ̅ ⲉϩⲣⲁⲓ̈ ⲉⲛⲓ]ⲉⲱⲛ ⲛ̅ϫ[ⲡⲟ ⲛ̅]ⲕⲁϩ‐ <text:line-break/><text:span text:style-name="T1"> </text:span><text:span text:style-name="T2">(71/21) </text:span> [ⲉⲧⲉ ⲡⲉⲩϣⲓ ⲡⲉ] ⲟⲩⲁⲧ’ϯ [ⲏⲡⲉ ⲉ]ⲣⲟ <text:line-break/><text:span text:style-name="T1"> </text:span><text:span text:style-name="T2">(71/22) </text:span> [ϥ ⲛ̅ⲧⲉ] ⲥⲟⲇⲟⲙⲏ · ⲛ̅ⲧ[ⲟⲟⲩ ⲇ]ⲉ ⲁⲩ‐ <text:line-break/><text:span text:style-name="T1"> </text:span><text:span text:style-name="T2">(71/23) </text:span> [ⲙⲟⲩⲧⲉ] ⲉ̣ⲣⲟⲟⲩ ϫⲉ ⲥ[ⲟⲇⲟⲙ]ⲏ ⲛ̅‐ <text:line-break/><text:span text:style-name="T1"> </text:span><text:span text:style-name="T2">(71/24) </text:span> [ⲧⲉ ⲡⲓⲛⲟ]ϭ̣ ⲥ̅ⲏ̅ⲑ̅· ⲉⲧⲉ̣ [ⲧⲁⲓ̈ ⲧⲉ] ⲅⲟⲙⲟ‐ <text:line-break/><text:span text:style-name="T1"> </text:span><text:span text:style-name="T2">(71/25) </text:span> [ϩⲣⲁ ⲁϥⲧⲱⲟⲩ̅]̅ⲛ̅ ⲛ̅ϭⲓ ⲡⲓ̣[ⲛⲟϭ ⲥ̅ⲏ]ⲑ̣̅ <text:line-break/><text:span text:style-name="T1"> </text:span><text:span text:style-name="T2">(71/26) </text:span> [ⲉⲃⲟⲗ ϩ̅ⲛ̅ ϯ]ⲡⲏⲅⲏ ⲛ̅ⲧⲉ̣ [ⲅⲟⲙⲟϩ]‐ <text:line-break/><text:span text:style-name="T1"> </text:span><text:span text:style-name="T2">(71/27) </text:span> [ⲣⲁ ⲛ̅ⲧⲥⲡⲟⲣⲁ] ⲁⲩⲱ ⲁϥ[ⲧⲟϭ̅ⲥ̅] <text:line-break/><text:span text:style-name="T1"> </text:span><text:span text:style-name="T2">(71/28) </text:span> [ϩ̅ⲙ̅ ⲡⲓⲙⲉϩⲙⲁ] ⲥⲛⲁⲩ ϩ̅ⲛ̅ ⲟ̣[ⲩⲙⲁ] <text:line-break/><text:span text:style-name="T1"> </text:span><text:span text:style-name="T2">(71/29) </text:span> [ⲙ̅ⲙⲟⲟⲛⲉ] ϩ̣ⲱⲱϥ ⲁⲩⲙ[ⲟⲩⲧⲉ] <text:line-break/><text:span text:style-name="T1"> </text:span><text:span text:style-name="T2">(71/30) </text:span> [ⲉⲣⲟϥ ϫⲉ ⲥ]ⲟ̣[ⲇ]ⲟⲙⲁ· ⲧⲁ̣ⲓ̈ [ⲧⲉ] <text:line-break/><text:span text:style-name="T1"> </text:span><text:span text:style-name="T2">(71/31) </text:span> [ϯⲅⲉⲛⲉⲁ ⲛ̅ⲧⲁⲥⲟ]ⲩ̣ⲱⲛ̅ϩ̅ ⲉ̣[ⲃⲟⲗ] <text:line-break/><text:span text:style-name="T1"> </text:span><text:span text:style-name="T2">(72/1) </text:span> {ϩ̅ⲓ}ⲧⲟⲟⲧ̅ⲥ̅ ⲛ̅ⲛⲉⲇⲱⲕⲗⲁ· <text:line-break/><text:span text:style-name="T1"> </text:span><text:span text:style-name="T2">(72/2) </text:span> ⲁⲥϫⲡⲟ ⲅⲁⲣ ϩⲛ ⲟⲩϣⲁϫⲉ ⲛ̅ⲁⲗ〈ⲏ〉ⲑⲉⲁ <text:line-break/><text:span text:style-name="T1"> </text:span><text:span text:style-name="T2">(72/3) </text:span> ⲙ̅ⲛ̅ ⲑⲉⲙⲓⲥⲥⲁ· ⲉ̣ⲧⲉ ⲧⲁⲣⲭⲏ ⲧⲉ ⲛ̅ⲧⲉ <text:line-break/><text:span text:style-name="T1"> </text:span><text:span text:style-name="T2">(72/4) </text:span> ⲟ̣ⲩⲥⲡⲟⲣⲁ ⲛ̅ⲧⲉ ⲡⲓⲱⲛ̅ϩ̅ ϣⲁ ⲉⲛⲉϩ <text:line-break/><text:span text:style-name="T1"> </text:span><text:span text:style-name="T2">(72/5) </text:span> ⲙ̣̅̅ⲛ̅ ⲟⲩⲟ̣[ⲛ] ⲛ̣[ⲓ]ⲙ ⲉⲧⲛⲁⲣ̅ϩⲩⲡⲟⲙⲓⲛ̣[ⲉ] <text:line-break/><text:soft-page-break/><text:span text:style-name="T1"> </text:span><text:span text:style-name="T2">(72/6) </text:span> [ⲉ]ⲃⲟⲗ {ϩ̅ⲓ}ⲧⲟⲟⲧ̅ⲥ̅ ⲛ̅ϯⲅⲛⲱⲥ[ⲓⲥ] ⲛ̅ⲧ[ⲉ] <text:line-break/><text:span text:style-name="T1"> </text:span><text:span text:style-name="T2">(72/7) </text:span> ⲧ̣ⲟⲩⲁⲡ̣[ⲟ]ⲣⲟⲓⲁ · ⲧⲁⲓ̈ ⲧⲉ ϯⲛⲟ̣ϭ ⲛ̅[ⲅⲉ]‐ <text:line-break/><text:span text:style-name="T1"> </text:span><text:span text:style-name="T2">(72/8) </text:span> [ⲛⲉ]ⲁ ⲁ[ⲩ]ⲱ ⲛ̅ⲁⲧ’ϫⲱϩ̅ⲙ̅· ⲧⲏ̣ ⲉⲧ̣[ⲁⲥ] <text:line-break/><text:span text:style-name="T1"> </text:span><text:span text:style-name="T2">(72/9) </text:span> [ⲟⲩⲱⲛ̅]̅ϩ̣̅̅ ⲉⲃⲟⲗ ϩ̅ⲛ̅ ϣ̣ⲟⲙ̅ⲧ’̅ ⲛ̅ⲕ̣[ⲟⲥ]‐ <text:line-break/><text:span text:style-name="T1"> </text:span><text:span text:style-name="T2">(72/10) </text:span> [ⲙⲟⲥ·] ⲁ̣ⲩⲱ ϥⲛⲁϣ[ⲱⲡⲉ ⲛ̅ϭⲓ ⲡⲓ]‐ <text:line-break/><text:span text:style-name="T1"> </text:span><text:span text:style-name="T2">(72/11) </text:span> ⲕ̣[ⲁⲧⲁ]ⲕⲗⲩⲥⲙⲟⲥ ⲉⲩ̣[ⲧⲩⲡⲟⲥ ϣⲁ] <text:line-break/><text:span text:style-name="T1"> </text:span><text:span text:style-name="T2">(72/12) </text:span> [ⲧⲥ]ⲩ̣ⲛⲧⲉⲗⲓⲁ ⲛ̅ⲧⲉ ⲡ̣ⲓⲉⲱ̣[ⲛ ⲛϥ̅{ⲉ̅ⲓ}] <text:line-break/><text:span text:style-name="T1"> </text:span><text:span text:style-name="T2">(72/13) </text:span> ⲉϩⲣⲁⲓ̈ ⲉⲡⲕⲟⲥⲙⲟⲥ [ⲉⲧⲃⲉ ⲧⲉⲓ̈] <text:line-break/><text:span text:style-name="T1"> </text:span><text:span text:style-name="T2">(72/14) </text:span> ⲅⲉⲛⲉⲁ ⲥⲉⲛⲁϣⲱⲡ[ⲉ ⲛ̅ϭⲓ ϩⲉⲛ] <text:line-break/><text:span text:style-name="T1"> </text:span><text:span text:style-name="T2">(72/15) </text:span> ⲣⲱⲕ̅ϩ̅ ϩ̣ⲓϫ̅ⲛ̅ ⲡⲕⲁϩ̣ [ ] <text:line-break/><text:span text:style-name="T1"> </text:span><text:span text:style-name="T2">(72/16) </text:span> .ⲛ[..]ⲛ̣ⲏ ⲛ̅ⲧⲉ ϯⲙ[ ϥⲛⲁϣⲱ] <text:line-break/><text:span text:style-name="T1"> </text:span><text:span text:style-name="T2">(72/17) </text:span> ⲡⲉ ⲛ̅[ϭⲓ] ⲡⲓϩⲙⲟⲧ’ ⲉ̣[ⲃⲟⲗ {ϩ̅ⲓ}ⲧⲟⲟⲧⲟⲩ] <text:line-break/><text:span text:style-name="T1"> </text:span><text:span text:style-name="T2">(72/18) </text:span> ⲛ̅[ⲛⲓⲡⲣ]ⲟⲫⲏⲧⲏⲥ ⲙ̅[̅ⲛ̅ ⲛⲓϩⲟⲩⲣⲓⲧ’] <text:line-break/><text:span text:style-name="T1"> </text:span><text:span text:style-name="T2">(72/19) </text:span> ⲛ̅ⲧ[ⲉ ϯⲅ]ⲉⲛⲉⲁ ⲉⲧ[ⲟⲛ̅ϩ · ⲉⲧⲃⲉ] <text:line-break/><text:span text:style-name="T1"> </text:span><text:span text:style-name="T2">(72/20) </text:span> ⲧⲉ[ⲓ̈ⲅⲉⲛⲉ]ⲁ ⲥⲉⲛⲁϣ̣[ⲱⲡⲉ ⲛ̅ϭⲓ] <text:line-break/><text:span text:style-name="T1"> </text:span><text:span text:style-name="T2">(72/21) </text:span> ϩⲉ[ⲛⲙⲟ]ⲩ̣ ⲙ̅ⲛ̅ ϩⲉⲛϩ̣ⲉ̣ⲃⲱ[ⲱⲛ·] <text:line-break/><text:span text:style-name="T1"> </text:span><text:span text:style-name="T2">(72/22) </text:span> ⲛⲁ[ⲓ̈ ⲧⲏⲣ]ⲟⲩ ⲥⲉⲛⲁϣⲱⲡ[ⲉ ⲉⲧⲃⲉ] <text:line-break/><text:span text:style-name="T1"> </text:span><text:span text:style-name="T2">(72/23) </text:span> ⲧⲉⲓ̈[ⲛⲟϭ ⲛ̅ⲅ]ⲉⲛⲉⲁ ⲁⲩⲱ̣ [ⲛ̅ⲁⲧ’] <text:line-break/><text:span text:style-name="T1"> </text:span><text:span text:style-name="T2">(72/24) </text:span> ϫⲱ̣[ϩ̅ⲙ̅ ·] ⲉ̣ⲧⲃⲉ ⲧⲉⲓ̈[ⲅⲉⲛⲉⲁ] <text:line-break/><text:span text:style-name="T1"> </text:span><text:span text:style-name="T2">(72/25) </text:span> ⲥ̣[ⲉⲛⲁϣ]ⲱⲡⲉ ⲛ̅ϭ[ⲓ ϩⲉⲛⲡⲉⲓⲣⲁ] <text:line-break/><text:span text:style-name="T1"> </text:span><text:span text:style-name="T2">(72/26) </text:span> [ⲥⲙⲟⲥ ⲙ̅]̅ⲛ̅ ϩⲉⲛⲡⲗⲁ[ⲛⲏ ⲛ̅ⲧⲉ] <text:line-break/><text:span text:style-name="T1"> </text:span><text:span text:style-name="T2">(72/27) </text:span> [ⲛⲓⲡⲣⲟ]ⲫⲏⲧⲏⲥ ⲛ̅[ⲛⲟⲩϫ · ⲧⲟ]‐ <text:line-break/><text:span text:style-name="T1"> </text:span><text:span text:style-name="T2">(72/28) </text:span> [ⲧⲉ ⲡⲓⲛ]ⲟϭ ⲥ̅ⲏ̅ⲑ̅ ⲛ̅ⲧ[ⲁϥⲛⲁⲩ] <text:line-break/><text:span text:style-name="T1"> </text:span><text:span text:style-name="T2">(72/29) </text:span> [ⲉϯⲉ]ⲛ̣ⲉⲣⲅⲓⲁ ⲙ̣̅[ⲡⲓ]ⲇ̣[ⲓⲁⲃⲟⲗⲟⲥ] <text:line-break/><text:span text:style-name="T1"> </text:span><text:span text:style-name="T2">(73/1) </text:span> ⲙ̅ⲛ̅ ⲛⲉϥⲕⲟⲧ̅ⲥ̅ ⲉⲧ̅ⲛ̅ⲧⲁϥ· ⲁⲩⲱ ⲙ̅ⲛ̅ <text:line-break/><text:span text:style-name="T1"> </text:span><text:span text:style-name="T2">(73/2) </text:span> ⲡⲓⲙⲉⲉⲩⲉ ⲉ[ⲧ̅]̅ⲛ̣̅̅ⲧⲁϥ ⲉⲧ̅ϥ̅ⲛⲁ̣ <text:line-break/><text:span text:style-name="T1"> </text:span><text:span text:style-name="T2">(73/3) </text:span> ⲛ̅ⲧ̅ϥ̅ ⲉϩⲣⲁⲓ̈ ⲉϫ̅ⲛ̅ ϯⲅⲉⲛⲉⲁ [ⲛ̅ⲁⲧ’]‐ <text:line-break/><text:span text:style-name="T1"> </text:span><text:span text:style-name="T2">(73/4) </text:span> ⲕⲓⲙ ⲙ̅ⲛ̅ ⲡⲓⲇⲓⲱⲅⲙ[ⲟⲥ ⲛ̅ⲧⲉ ⲛⲉϥ]‐ <text:line-break/><text:span text:style-name="T1"> </text:span><text:span text:style-name="T2">(73/5) </text:span> [ϭ]ⲟ̣ⲙ ⲙ̅ⲛ̅ ⲛⲉϥⲁⲅⲅⲉⲗⲟⲥ̣ [ⲙ̅ⲛ̅ ⲧⲉϥ]‐ <text:line-break/><text:span text:style-name="T1"> </text:span><text:span text:style-name="T2">(73/6) </text:span> [ⲡⲗ]ⲁⲛⲏ ϫⲉ ϥⲛⲁⲣ̅ⲧⲟⲗⲙⲁ [ⲉⲣⲟϥ] <text:line-break/><text:span text:style-name="T1"> </text:span><text:span text:style-name="T2">(73/7) </text:span> [ⲧⲟ]ⲧⲉ ⲡⲓⲛⲟϭ ⲥ̅ⲏ̅ⲑ̅ ⲁϥⲉⲓⲛ[ⲉ ⲉϩⲣⲁⲓ̈] <text:line-break/><text:span text:style-name="T1"> </text:span><text:span text:style-name="T2">(73/8) </text:span> [ⲛ̅ⲟⲩ]ⲥ̣ⲙⲟⲩ ⲙ̅ⲡⲓⲛⲟϭ ⲛ̣̅[ⲛⲁⲧ’ϫⲁ] <text:line-break/><text:span text:style-name="T1"> </text:span><text:span text:style-name="T2">(73/9) </text:span> [ϩ̅ⲙ̅ϥ̅] ⲛ̅ⲛⲁⲧⲛⲁⲩ ⲉⲣⲟϥ ⲛ̣̅[ⲁⲧ’ϯ ⲣⲁⲛ] <text:line-break/><text:span text:style-name="T1"> </text:span><text:span text:style-name="T2">(73/10) </text:span> [ⲉⲣⲟϥ] ⲙ̅ⲡⲁ[ⲣ]ⲑⲉⲛⲓⲕⲟⲛ ⲙ̅[ⲡ̅ⲛ̅ⲁ̅] ⲛ̣̅‐ <text:line-break/><text:span text:style-name="T1"> </text:span><text:span text:style-name="T2">(73/11) </text:span> [ⲧⲉ ⲡⲓⲱ]ⲧ’ ⲛ̅ⲙ̅ ϯϩⲟⲟⲩⲧ’ ⲙ̅ⲡⲁⲣⲑⲉ‐ <text:line-break/><text:span text:style-name="T1"> </text:span><text:span text:style-name="T2">(73/12) </text:span> [ⲛⲟⲥ ϯⲃ̅]̅ⲁ̅ⲣ̅ⲃ̅ⲏ̅ⲗ̅ⲱ̅ ⲙ̅ⲛ̅ ⲡⲓϩⲟⲟⲩⲧ’ <text:line-break/><text:span text:style-name="T1"> </text:span><text:span text:style-name="T2">(73/13) </text:span> [ⲛ̅]ⲁⲗ̣ⲟⲩ ⲧ̅ⲉ̅ⲗ̅ⲙ̅ⲁ̅ⲏ̅ⲗ̅ ⲧ̅ⲉⲗⲙⲁⲭⲁⲏⲗ̅ <text:line-break/><text:span text:style-name="T1"> </text:span><text:span text:style-name="T2">(73/14) </text:span> [ⲏ̅]̅ⲗ̅ⲓ̅ ⲏ̅ⲗⲓ̅ ⲙ̅ⲁⲭⲁⲣ̅ ⲙ̅ⲁⲭⲁⲣ̅ ⲥ̅ⲏⲑ̅ <text:line-break/><text:span text:style-name="T1"> </text:span><text:span text:style-name="T2">(73/15) </text:span> [ϯ]ϭⲟⲙ ⲉⲧⲟⲛ̅ϩ̅ · ϩ̅ⲛ̅ ⲟⲩⲙ̅ⲛ̅[ⲧ]ⲙⲉ ⲛⲁ‐ <text:line-break/><text:span text:style-name="T1"> </text:span><text:span text:style-name="T2">(73/16) </text:span> [ⲙ]ⲉ ϯϩⲟⲟⲩ̣ⲧ’ ⲙ̅ⲡⲁⲣⲑⲉⲛⲟ[ⲥ] ⲓ̅̈̅ⲟ̣̅̅ⲩ̅[̅ⲏ̅ⲗ̅] <text:line-break/><text:span text:style-name="T1"> </text:span><text:span text:style-name="T2">(73/17) </text:span> [ⲙ̅ⲛ̅ ⲏ̅]ⲥ̣ⲏⲫⲏⲭ̅ ⲡⲓⲣⲉϥⲁⲙⲁϩⲧⲉ ⲙ̅‐ <text:line-break/><text:span text:style-name="T1"> </text:span><text:span text:style-name="T2">(73/18) </text:span> [ⲡⲉⲟⲟ]ⲩ ⲙ̅ⲛ̅ ⲡⲕⲗⲟⲙ ⲛ̅ⲧⲉ ⲡⲉϥⲉⲟ‐ <text:line-break/><text:span text:style-name="T1"> </text:span><text:span text:style-name="T2">(73/19) </text:span> [ⲟⲩ] ⲙ̅ⲛ̅ ⲡⲓⲛⲟϭ ⲛ̅ⲛⲉⲱⲛ ⲛ̅ⲣⲉϥ <text:line-break/><text:span text:style-name="T1"> </text:span><text:span text:style-name="T2">(73/20) </text:span> [ϯ ⲉ]ⲟ̣ⲟⲩ ⲙ̅ⲛ̅ ⲛⲓⲑⲣⲟⲛⲟⲥ ⲉⲧ̅ⲛ̅ϩⲣⲁⲓ̈ <text:line-break/><text:span text:style-name="T1"> </text:span><text:span text:style-name="T2">(73/21) </text:span> [ⲛ̅ϩ]ⲏⲧ̅ϥ̅ ⲙ̅ⲛ̅ ⲛⲓⲛⲟϭ ⲉⲧ’ⲕⲱⲧⲉ <text:line-break/><text:span text:style-name="T1"> </text:span><text:span text:style-name="T2">(73/22) </text:span> [ⲉⲣ]ⲟⲟⲩ ⲙ̅ⲛ̅ ϩⲉⲛⲉⲟ̣[ⲟ]ⲩ ⲙ̅ⲛ̅ <text:line-break/><text:span text:style-name="T1"> </text:span><text:span text:style-name="T2">(73/23) </text:span> [ϩⲉ]ⲛ̣ⲁⲧ’ϫⲱϩ̅ⲙ̅ ⲙ̅ⲛ̅ [ⲡⲓ]ⲡⲗⲏⲣⲱ‐ <text:line-break/><text:soft-page-break/><text:span text:style-name="T1"> </text:span><text:span text:style-name="T2">(73/24) </text:span> [ⲙⲁ] ⲧⲏ̣ⲣ̅ϥ̣̅̅ ⲉ̣ⲧⲁⲓ̈ⲣ̅ϣ̅ⲣⲡ’̅ ⲛ̅ϫⲟⲟϥ <text:line-break/><text:span text:style-name="T1"> </text:span><text:span text:style-name="T2">(73/25) </text:span> [ⲁⲩⲱ] ⲁϥⲣ̅ⲁⲓⲧⲓ ⲛ̅ϣⲟⲣ̣̅̅ⲡ̅’̅ ⲛ̅ϩⲉⲛ <text:line-break/><text:span text:style-name="T1"> </text:span><text:span text:style-name="T2">(73/26) </text:span> [ⲣⲉϥ]ⲁⲣⲉϩ ⲛ̅ⲧⲉ ⲧⲉϥⲥⲡⲟⲣⲁ· <text:line-break/><text:span text:style-name="T1"> </text:span><text:span text:style-name="T2">(73/27) </text:span> [ⲧⲟ]ⲧⲉ ⲁⲩ{ⲉ̣̅̅ⲓ̣̅} ⲉⲃⲟⲗ ϩ̅ⲛ̅ ⲛⲓⲛⲟ̣[ϭ] ⲛ̅‐ <text:line-break/><text:span text:style-name="T1"> </text:span><text:span text:style-name="T2">(73/28) </text:span> [ⲛⲉ]ⲱⲛ ⲛ̣̅ϭ ϥⲧⲟⲩϣⲉ ⲛ̣̅[ⲁⲅⲅⲉ]‐ <text:line-break/><text:span text:style-name="T1"> </text:span><text:span text:style-name="T2">(73/29) </text:span> [ⲗⲟⲥ ⲙ̅ⲡⲁⲏ]ⲣ ⲉϥ̣ⲛ̅ⲙ̅ⲙⲁ[ⲩ ⲛ̅ϭⲓ] <text:line-break/><text:span text:style-name="T1"> </text:span><text:span text:style-name="T2">(74/1) </text:span> ⲁ̅ⲉ̅ⲣ̅ⲟ̅ⲥ̅ⲓ̅ⲏ̅ⲗ̅ ⲙ̅ⲛ̅ ⲡⲓⲛⲟϭ ⲥ̅ⲉⲗⲙⲉⲗⲭⲉⲗ̅ <text:line-break/><text:span text:style-name="T1"> </text:span><text:span text:style-name="T2">(74/2) </text:span> ⲛ̣ⲓⲣ[ⲉ]ϥⲁⲣⲉϩ ⲛ̅ⲧⲉ ϯⲛⲟϭ ⲛ̅ⲁⲧ’ϫⲱϩ̅ⲙ̅ <text:line-break/><text:span text:style-name="T1"> </text:span><text:span text:style-name="T2">(74/3) </text:span> ⲛ̅ⲅ[ⲉ]ⲛⲉⲁ ⲙ̅ⲛ̅ ⲡⲉ̣[ⲥⲕ]ⲁⲣⲡⲟⲥ ⲙ̅ⲛ̅ ⲛⲓⲣⲱ‐ <text:line-break/><text:span text:style-name="T1"> </text:span><text:span text:style-name="T2">(74/4) </text:span> [ⲙⲉ ⲉⲧ]ⲛⲉⲁⲩ ⲛ̅ⲧⲉ ⲡⲓⲛⲟϭ ⲥ̅ⲏ̅ⲑ̅· ⲉϣ <text:line-break/><text:span text:style-name="T1"> </text:span><text:span text:style-name="T2">(74/5) </text:span> [... ⲡ]ⲓ̣ⲭ̣ⲣ̣ⲟ[ⲛ]ⲟⲥ ⲙ̅ⲛ̅ ⲡⲓⲟⲩⲟⲉⲓϣ ⲛ̅‐ <text:line-break/><text:span text:style-name="T1"> </text:span><text:span text:style-name="T2">(74/6) </text:span> [ⲁ̅ⲗ̅ⲏ̅ⲑ̅ⲉ̅ⲓ̅]̅ⲁ̅ ⲙ̅ⲛ̅ ⲑ̅ⲉⲙⲓⲥⲥⲁ̅ ϣⲁ ⲧⲥⲩ̣[ⲛ] <text:line-break/><text:span text:style-name="T1"> </text:span><text:span text:style-name="T2">(74/7) </text:span> [ⲧⲉⲗⲓⲁ ⲛ̅ⲧⲉ] ⲛⲉⲓ̈ⲁⲓⲱⲛ ⲙ̅ⲛ̅ ⲛⲉ̣ⲩⲁⲣⲭ[ⲱⲛ] <text:line-break/><text:span text:style-name="T1"> </text:span><text:span text:style-name="T2">(74/8) </text:span> [ⲙ̅ⲛ̅ ⲛⲏ ⲉⲧ]ⲁⲩϯ ϩⲁⲡ’ ⲛ̅ϭⲓ ⲛⲓⲛⲟϭ ⲛ̅[ⲕⲣⲓ]‐ <text:line-break/><text:span text:style-name="T1"> </text:span><text:span text:style-name="T2">(74/9) </text:span> [ⲧⲏⲥ ϣⲁϩ]ⲣ̣ⲁⲓ̈ ⲉⲡⲙⲟⲩ· ⲧⲟⲧⲉ ⲡ[ⲓⲛⲟϭ] <text:line-break/><text:span text:style-name="T1"> </text:span><text:span text:style-name="T2">(74/10) </text:span> [ⲥ̅ⲏ̅ⲑ̅ ⲁⲩⲧ]ⲁⲩⲟϥ ⲉⲃⲟⲗ {ϩⲓ}ⲧ̣[ⲟⲟⲧⲟⲩ] <text:line-break/><text:span text:style-name="T1"> </text:span><text:span text:style-name="T2">(74/11) </text:span> [ⲙ̅ⲡⲓϥⲧⲟ]ⲟⲩ ⲛ̅ⲛⲟϭ ⲙ̅ⲫⲱⲥⲧ̣[ⲏⲣ ϩ̅ⲙ̅] <text:line-break/><text:span text:style-name="T1"> </text:span><text:span text:style-name="T2">(74/12) </text:span> ⲡ[ⲟⲩ]ⲱϣⲉ ⲛ̅ⲧⲉ ⲡⲓⲁⲩⲧⲟⲅⲉⲛ[ⲏⲥ ⲙ̅ⲛ̅] <text:line-break/><text:span text:style-name="T1"> </text:span><text:span text:style-name="T2">(74/13) </text:span> ⲡⲓ̣ⲡⲗⲏⲣⲱⲙⲁ ⲧⲏⲣ̅ϥ̅ ⲉⲧ̅[ⲛ̅ⲧⲁⲩ ϩ̅ⲛ̅] <text:line-break/><text:span text:style-name="T1"> </text:span><text:span text:style-name="T2">(74/14) </text:span> ⲟⲩϯ ⲛ̅ⲧⲁϥ ⲙ̅ⲛ̅ ⲟⲩϯ ⲙⲉⲧ̣ⲉ [ⲛ̅ⲧⲉ] <text:line-break/><text:span text:style-name="T1"> </text:span><text:span text:style-name="T2">(74/15) </text:span> ⲡⲓⲛⲟϭ ⲛ̅ⲛⲁⲧⲛⲁⲩ ⲉⲣⲟϥ ⲙ̅ⲡ̅ⲛ̅[̅ⲁ̅] <text:line-break/><text:span text:style-name="T1"> </text:span><text:span text:style-name="T2">(74/16) </text:span> ⲙ̅ⲛ̅ ϯϯⲉ ⲛ̅ⲥⲫⲣⲁⲅⲓⲥ ⲙ̅ⲛ̅ ⲡⲓⲡⲗ[ⲏ]‐ <text:line-break/><text:span text:style-name="T1"> </text:span><text:span text:style-name="T2">(74/17) </text:span> ⲣⲱⲙⲁ̣ ⲧⲏⲣ̅ϥ̅· ⲉ〈ϥ〉ⲥ̣ⲓ̣[ⲛ]ⲉ ⲉⲃⲟⲗ ϩ̅ⲛ̣̅ <text:line-break/><text:span text:style-name="T1"> </text:span><text:span text:style-name="T2">(74/18) </text:span> ϯ[ϣ]ⲟⲙⲧⲉ ⲙ̅ⲡⲁⲣⲟⲩⲥⲓⲁ ⲉ̣[ⲧⲁⲓ̈ⲣ̅] <text:line-break/><text:span text:style-name="T1"> </text:span><text:span text:style-name="T2">(74/19) </text:span> ϣ̅ⲣ̅ⲡ̅’̅ ⲛ̅ϫⲟⲟⲩ· ⲉⲃⲟⲗ ⲇⲉ [ϩ̅ⲙ̅ ⲡⲓ]‐ <text:line-break/><text:span text:style-name="T1"> </text:span><text:span text:style-name="T2">(74/20) </text:span> ⲕⲁⲧⲁⲕⲗⲩⲥⲙⲟⲥ ⲙ̅ⲛ̅ ⲡⲓⲣⲱ[ⲕ̅ϩ̅] <text:line-break/><text:span text:style-name="T1"> </text:span><text:span text:style-name="T2">(74/21) </text:span> ⲙ̅ⲛ̅ ⲡⲓϩⲁⲡ’ ⲛ̅ⲧⲉ ⲛⲓⲁⲣⲭⲱⲛ ⲙ̣̅[ⲛ̅] <text:line-break/><text:span text:style-name="T1"> </text:span><text:span text:style-name="T2">(74/22) </text:span> ⲛⲓⲉⲝⲟⲩⲥⲓⲁ ⲙ̅ⲛ̅ ⲛⲓϭⲟⲙ ⲉⲛⲟ[ⲩ] <text:line-break/><text:span text:style-name="T1"> </text:span><text:span text:style-name="T2">(74/23) </text:span> ϩ̣̅̅ⲙ̅ ⲛ̅ⲧⲏ ⲉⲧⲁⲥⲥⲱⲣ̅ⲙ̅ ⲉⲃⲟⲗ {ϩⲓ}ⲧ̣̅[ⲛ̅] <text:line-break/><text:span text:style-name="T1"> </text:span><text:span text:style-name="T2">(74/24) </text:span> ⲟⲩϩⲱⲧ̣̅̅[̅ⲡ̅’̅] ⲛ̅ⲕⲟⲥⲙⲟⲥ· ⲙ̅ⲛ̅ ⲡ[ⲓϫⲱ] <text:line-break/><text:span text:style-name="T1"> </text:span><text:span text:style-name="T2">(74/25) </text:span> ⲕ̅ⲙ̅ ⲛ̅ⲟ[ⲩⲥ]ⲱ̣ⲙⲁ· ⲉⲃⲟ[ⲗ] {ϩ[ⲓ}]ⲧ̅ⲙ̣̅ [ⲡⲓ]‐ <text:line-break/><text:span text:style-name="T1"> </text:span><text:span text:style-name="T2">(74/26) </text:span> ϫⲡⲟ ⲛ̅ϣⲁϫⲉ ⲡⲏ ⲉ̣[ⲧ]ⲁϥⲥⲃⲧ[ⲱⲧ̅ϥ̅] <text:line-break/><text:span text:style-name="T1"> </text:span><text:span text:style-name="T2">(74/27) </text:span> ⲛ̅ϭⲓ ⲡⲓ[ⲛ]ⲟ̣ϭ ⲥ̅ⲏ̅ⲑ̅ ϩ̅ⲛ̅ ⲟ̣ⲩ̣ⲙ[ⲩⲥⲧⲏ]‐ <text:line-break/><text:span text:style-name="T1"> </text:span><text:span text:style-name="T2">(74/28) </text:span> ⲣⲓⲟⲛ ⲉⲃⲟⲗ {ϩ̅ⲓ}ⲧⲟⲟⲧ̅ⲥ̅ [ⲛ̅]ϯⲡⲁⲣⲑ̣[ⲉ] <text:line-break/><text:span text:style-name="T1"> </text:span><text:span text:style-name="T2">(74/29) </text:span> ⲛ̣[ⲟ]ⲥ ⲉⲟⲩⲉϩ̅ⲙ̅ ϫⲡⲟ ⲛ̅ⲛⲉⲧⲟ̣[ⲩ] <text:line-break/><text:span text:style-name="T1"> </text:span><text:span text:style-name="T2">(74/30) </text:span> [ⲁⲁⲃ· ⲉ]ⲃⲟⲗ {ϩ̅ⲓ}ⲧⲟ̣ⲟⲧ̅ϥ̅ ⲙ̅[ⲡ̅ⲡ̅ⲛⲁ̅ ⲉⲧ’]‐ <text:line-break/><text:span text:style-name="T1"> </text:span><text:span text:style-name="T2">(75/1) </text:span> ⲟⲩⲁⲁⲃ ⲙ̅ⲛ̅ ϩⲉⲛⲥⲩⲙⲃⲟⲗⲟⲛ ⲛ̅ⲛⲁ‐ <text:line-break/><text:span text:style-name="T1"> </text:span><text:span text:style-name="T2">(75/2) </text:span> ⲧⲛⲁⲩ ⲉⲣⲟⲟⲩ ⲁ̣ⲩⲱ̣ ⲉⲩϩⲏⲡ’ ⲉⲃⲟⲗ <text:line-break/><text:span text:style-name="T1"> </text:span><text:span text:style-name="T2">(75/3) </text:span> {ϩ̅ⲓ}ⲧ̅ⲛ̅ ⲟⲩϩⲱⲧ̅ⲃ̅ ⲛ̅[ⲧ]ⲉ̣ ⲟⲩⲕⲟⲥⲙⲟⲥ <text:line-break/><text:span text:style-name="T1"> </text:span><text:span text:style-name="T2">(75/4) </text:span> ⲉⲩⲕⲟⲥⲙⲟⲥ· ⲉⲃⲟⲗ {ϩ̣̅̅ⲓ}ⲧⲛ̅ ⲟⲩⲁⲡⲟ‐ <text:line-break/><text:span text:style-name="T1"> </text:span><text:span text:style-name="T2">(75/5) </text:span> ⲧⲁⲅⲏ ⲛ̅ⲧⲉ ⲟⲩⲕⲟⲥⲙⲟⲥ ⲙ̅ⲛ̅ ⲡⲛⲟⲩ‐ <text:line-break/><text:span text:style-name="T1"> </text:span><text:span text:style-name="T2">(75/6) </text:span> ⲧ̣ⲉ ⲛ̅ⲧⲉ ⲡⲓⲙ̅ⲛ̅ⲧϣⲟⲙⲧⲉ ⲛ̅ⲛⲉⲱⲛ· <text:line-break/><text:span text:style-name="T1"> </text:span><text:span text:style-name="T2">(75/7) </text:span> ⲉⲃⲟⲗ {ϩ̅ⲓ}ⲧ̅ⲛ̅ ⲟⲩⲧⲱϩ̅ⲙ̅ ⲉⲃⲟⲗ {ϩⲓ}ⲧ̅ⲛ̅ ⲛ[ⲉ] <text:line-break/><text:span text:style-name="T1"> </text:span><text:span text:style-name="T2">(75/8) </text:span> ⲧⲟ̣ⲩⲁⲁⲃ ⲙ̅ⲛ̅ ⲛⲓⲁⲧ’ϣⲁϫⲉ ⲙ̅ⲙⲟⲟⲩ̣ <text:line-break/><text:span text:style-name="T1"> </text:span><text:span text:style-name="T2">(75/9) </text:span> ⲙ̅ⲛ̅ ⲛⲓⲁⲧ’ϫⲱϩ̅ⲙ̅ ⲛ̅ⲕⲟⲩⲟ̣ⲩⲛ̅ϥ̅ ⲛ̅[ⲧⲉ] <text:line-break/><text:span text:style-name="T1"> </text:span><text:span text:style-name="T2">(75/10) </text:span> ⲡⲟⲩⲟⲉⲓⲛ ⲉⲧⲛⲉⲁϥ· ⲡⲏ̣ ⲉⲧ̣̅̅[̅ⲣ̅ϣ̅ⲣⲡ’̅] <text:line-break/><text:span text:style-name="T1"> </text:span><text:span text:style-name="T2">(75/11) </text:span> ⲛ̣̅ϣ̣[ⲟ]ⲟⲡ’ ϩ̅ⲛ̅ ⲟⲩⲡⲣⲟⲛⲟⲓⲁ ⲁⲩⲱ̣ ⲁϥ‐ <text:line-break/><text:soft-page-break/><text:span text:style-name="T1"> </text:span><text:span text:style-name="T2">(75/12) </text:span> ⲧⲁϫ̣ⲣ̣ⲟ ⲙ̅ⲡⲉⲧ’ⲟⲩⲁⲁⲃ ⲉⲃⲟⲗ {ϩ̅ⲓ}ⲧⲟⲟⲧ̅ⲥ̅ <text:line-break/><text:span text:style-name="T1"> </text:span><text:span text:style-name="T2">(75/13) </text:span> ⲙ̅ⲛ̅ ⲡⲓⲱⲙ̅ⲥ̅ ⲉⲧ’ⲗⲥⲁϩⲣⲁⲓ̈ ⲛ̅ⲛⲓⲡⲏⲩⲉ <text:line-break/><text:span text:style-name="T1"> </text:span><text:span text:style-name="T2">(75/14) </text:span> ⲉⲃⲟⲗ {ϩ̅ⲓ}ⲧⲟⲟⲧ̅ϥ̅ ⲙ̅ⲡⲉⲧ’ⲟⲩⲁⲁⲃ ⲙ̅ⲛ̅ <text:line-break/><text:span text:style-name="T1"> </text:span><text:span text:style-name="T2">(75/15) </text:span> ⲡ[ⲓ]ⲁⲧ’ϫⲱϩ̅ⲙ̅· ⲙ̅ⲛ̅ ⲓ̅ⲥ̅ ⲡⲏ ⲉⲧⲁⲩ̣ϫⲡⲟϥ <text:line-break/><text:span text:style-name="T1"> </text:span><text:span text:style-name="T2">(75/16) </text:span> ϩ̣̅̅ⲛ̅ ⲟⲩϣⲁϫⲉ [ⲉ]ϥⲟⲛ̅ϩ̅· ⲡⲏ ⲉⲧⲁϥⲧⲁ <text:line-break/><text:span text:style-name="T1"> </text:span><text:span text:style-name="T2">(75/17) </text:span> ⲁϥ {ϩ̅ⲓ}ⲱⲱϥ ⲛ̅ϭⲓ ⲡⲓⲛⲟϭ ⲥ̅ⲏⲑ̅ ⲁ[ⲩ]ⲱ̣ <text:line-break/><text:span text:style-name="T1"> </text:span><text:span text:style-name="T2">(75/18) </text:span> ⲁϥϯ ⲉⲓϥ̣̅̅ⲧ̅’̅ ⲛ̅ⲛⲓϭⲟⲙ ⲛ̅ⲧⲉ ⲡⲓⲙ̅ⲛⲧ’̅ <text:line-break/><text:span text:style-name="T1"> </text:span><text:span text:style-name="T2">(75/19) </text:span> ϣⲟⲙⲧⲉ ⲛ̅ⲛⲉⲱⲛ ⲁⲩⲱ ⲁϥⲟⲩⲟⲥϥⲟⲩ <text:line-break/><text:span text:style-name="T1"> </text:span><text:span text:style-name="T2">(75/20) </text:span> ⲉⲃⲟⲗ {ϩ̅ⲓ}ⲧⲟⲟⲧ̅ϥ̅· ϣⲁⲩⲛ̅ⲧⲟⲩ ⲁⲩ[ⲱ] <text:line-break/><text:span text:style-name="T1"> </text:span><text:span text:style-name="T2">(75/21) </text:span> ϣⲁⲩϫⲓⲧⲟⲩ· ⲁⲩⲱ ϣⲁⲩϩⲟⲕⲟⲩ <text:line-break/><text:span text:style-name="T1"> </text:span><text:span text:style-name="T2">(75/22) </text:span> ϩ̅ⲛ̅ ⲟⲩϩⲟⲡⲗⲟⲛ ⲛ̅ⲧⲉ ⲡⲥⲟⲟⲩⲛ ⲛ̅ⲧ̣ⲙⲉ <text:line-break/><text:span text:style-name="T1"> </text:span><text:span text:style-name="T2">(75/23) </text:span> ϩ̅ⲛ̅ ⲟⲩϭⲟⲙ ⲛ̅ⲁⲧϭϫ[ⲱ]ϩ̅ⲙ̅ ⲛ̣̅ⲁⲧ’ϫⲣⲟ <text:line-break/><text:span text:style-name="T1"> </text:span><text:span text:style-name="T2">(75/24) </text:span> ⲉⲣⲟⲥ· ⲁⲩ[ⲱ ⲁⲩ]ⲟⲩⲱⲛ̅ϩ̅ ⲛⲁⲓ̈ ⲉⲃⲟⲗ <text:line-break/><text:span text:style-name="T1"> </text:span><text:span text:style-name="T2">(75/25) </text:span> ⲛ̅ⲛⲓⲛ̣ⲟϭ ⲉⲧⲁϩⲉⲣⲁⲧⲟⲩ ⲓ̅̈̅ⲉ̅ⲥ̅ⲉ̅ⲁ̅ <text:line-break/><text:span text:style-name="T1"> </text:span><text:span text:style-name="T2">(75/26) </text:span> ⲙ̅ⲁ̅ⲥ̅ⲁ̅ⲣ̅ⲉ̅ⲁ̅ · ⲓ̅̈ⲉⲥⲥⲉⲇⲉⲕⲉⲁ̅ · ⲡⲓⲙⲟ‐ <text:line-break/><text:span text:style-name="T1"> </text:span><text:span text:style-name="T2">(75/27) </text:span> ⲟⲩ ⲉⲧⲟⲛ̅ϩ̅ ⲙ̅ⲛ̅ ⲛⲓⲛⲟϭ ⲛ̅ⲥⲁϯ[ⲅⲟⲥ] <text:line-break/><text:span text:style-name="T1"> </text:span><text:span text:style-name="T2">(75/28) </text:span> ⲡⲓⲛⲟϭ ⲓ̅̈̅ⲁ̅ⲕ̅ⲱ̅ⲃ̅ ⲙ̅ⲛ̅ ⲑ̅ⲉⲟⲡ[ⲉⲙⲡⲧⲟⲥ̅] <text:line-break/><text:span text:style-name="T1"> </text:span><text:span text:style-name="T2">(76/1) </text:span> ⲙ̅ⲛ̅ ⲓ̅̈ⲥ̣ⲁ̅ⲟ̅ⲩⲏⲗ̅ ⲙ̅ⲛ̅ ⲡⲏ ⲉⲧⲕⲏ ⲉϩⲣⲁⲓ̈ <text:line-break/><text:span text:style-name="T1"> </text:span><text:span text:style-name="T2">(76/2) </text:span> ⲉϫ̅ⲙ̣̅̅ ⲡⲛⲁ ⲙ̅ⲏ̣ⲡ̣[..]ⲏ̣ⲗ̅ · ⲙ̅ⲛ̅ ⲛⲏ ⲉⲧ’‐ <text:line-break/><text:span text:style-name="T1"> </text:span><text:span text:style-name="T2">(76/3) </text:span> ⲕⲏ ⲉϩⲣⲁⲓ̈ ⲉϫ̅ⲛ̅ ⲛⲓⲡⲏⲅⲏ ⲛ̅ⲧⲉ ⲧⲙⲉ <text:line-break/><text:span text:style-name="T1"> </text:span><text:span text:style-name="T2">(76/4) </text:span> ⲙ̅ⲓ̅ⲭ̅ⲉ̅ⲁ̅ ⲙ̅[ⲛ̅] ⲙ̅ⲓⲭⲁⲣ̅ ⲙ̅ⲛ̅ ⲙ̅ⲛⲏⲥⲓⲛⲟⲩ̅ <text:line-break/><text:span text:style-name="T1"> </text:span><text:span text:style-name="T2">(76/5) </text:span> ⲙ̅ⲛ̅ ⲡⲏ ⲉⲧ’ⲕⲏ ⲉϩⲣⲁⲓ̈ ⲉϫ̅ⲛ̣̅ ⲡⲓϫⲱ‐ <text:line-break/><text:span text:style-name="T1"> </text:span><text:span text:style-name="T2">(76/6) </text:span> ⲕ̅ⲙ̅ ⲛ̅ⲧⲉ ⲛⲉⲧⲟ̣ⲛ̅ϩ̅ ⲡⲓⲣⲉϥⲧ̅ⲃ̅ⲃⲟ <text:line-break/><text:span text:style-name="T1"> </text:span><text:span text:style-name="T2">(76/7) </text:span> ⲥ̅ⲉ̅ⲥ̅ⲉ̅ⲅ̣̅̅ⲅ̅ⲉ̅ⲛ̅ⲃ̅ⲁ̅ⲣ̅ⲫ̅ⲁ̅ⲣ̅ⲁ̅ⲅ̅ⲅ̅ⲏ̅ⲥ̅ ⲙ̅ⲛ̅ <text:line-break/><text:span text:style-name="T1"> </text:span><text:span text:style-name="T2">(76/8) </text:span> [ⲛ]ⲏ ⲉⲧ’ⲕ̣ⲏ ⲉϩⲣⲁⲓ̈ ⲉϫ̅ⲛ̅ ⲛⲓⲡⲩⲗⲏ ⲛ̅‐ <text:line-break/><text:span text:style-name="T1"> </text:span><text:span text:style-name="T2">(76/9) </text:span> [ⲧⲉ ⲛⲓ]ⲙⲟ̣ⲟⲩ ⲛ̅ⲧⲉ ⲡⲓⲱⲛ̅ϩ̅ ⲙ̅ⲓ̣ⲥⲉⲩⲥ̅ <text:line-break/><text:span text:style-name="T1"> </text:span><text:span text:style-name="T2">(76/10) </text:span> [ⲙ̅ⲛ̅] ⲙ̅ⲓⲭⲁⲣ̅ ⲙ̅ⲛ̅ ⲛⲏ ⲉⲧ’ⲕⲏ ⲉϩⲣ̣[ⲁ]ⲓ̈ ⲉ‐ <text:line-break/><text:span text:style-name="T1"> </text:span><text:span text:style-name="T2">(76/11) </text:span> ϫ̅ⲛ̅ ⲡⲧⲱⲱⲛ̅ϥ̅ ⲥ̅ⲉⲗⲇⲁⲱ̅ ⲙ̅ⲛ̅ ⲉ̅ⲗⲉ̅‐ <text:line-break/><text:span text:style-name="T1"> </text:span><text:span text:style-name="T2">(76/12) </text:span> ⲛ̅ⲟ̅ⲥ̅ ⲙ̅ⲛ̅ ⲛⲓⲡⲁⲣⲁⲗⲏⲙⲡⲧⲱⲣⲟⲥ <text:line-break/><text:span text:style-name="T1"> </text:span><text:span text:style-name="T2">(76/13) </text:span> ⲛ̅ⲧⲉ ϯⲅⲉⲛⲉⲁ ⲉⲧⲟⲩⲁⲁⲃ ⲙ̅ⲛ̅ ⲛⲓ <text:line-break/><text:span text:style-name="T1"> </text:span><text:span text:style-name="T2">(76/14) </text:span> ⲁⲧ’ϫ̣ⲱϩ̅ⲙ̅ ⲛ̅ⲣⲱⲙⲉ ⲁⲩⲱ ⲉⲧϫⲟ‐ <text:line-break/><text:span text:style-name="T1"> </text:span><text:span text:style-name="T2">(76/15) </text:span> ⲟⲣ ⲛ̅ⲧⲉ ⲡⲓⲛⲟϭ ⲥ̅ⲏ̅ⲑ̣̅̅· ⲛⲓⲇ[ⲓ]ⲁ̣ⲕⲱⲛ <text:line-break/><text:span text:style-name="T1"> </text:span><text:span text:style-name="T2">(76/16) </text:span> [ⲛ̅ⲧ]ⲉ ⲡⲓϥⲧⲟⲟⲩ ⲙ̅ⲫⲱⲥⲧⲏⲣ ⲡⲓ‐ <text:line-break/><text:span text:style-name="T1"> </text:span><text:span text:style-name="T2">(76/17) </text:span> ⲛⲟϭ ⲛ̅ⲅ̅ⲁ̅ⲙ̅ⲁ̅ⲗ̅ⲓ̅ⲏ̅ⲗ̅ ⲙ̅ⲛ̅ ⲡⲓⲛⲟϭ ⲛ̅‐ <text:line-break/><text:span text:style-name="T1"> </text:span><text:span text:style-name="T2">(76/18) </text:span> ⲅ̅ⲁ̅ⲃ̅ⲣ̅[̅ⲓ̅]̅ⲏ̅ⲗ̅ ⲙ̅ⲛ̅ ⲡⲓⲛⲟϭ ⲥ̅ⲁⲙⲃ̣ⲗⲱ̅ <text:line-break/><text:span text:style-name="T1"> </text:span><text:span text:style-name="T2">(76/19) </text:span> ⲙ̅ⲛ̅ ⲡⲓⲛⲟϭ ⲁ̅ⲃⲣⲁⲥⲁⲝ̅ ⲙ̅ⲛ̅ ⲛⲏ ⲉⲧ’‐ <text:line-break/><text:span text:style-name="T1"> </text:span><text:span text:style-name="T2">(76/20) </text:span> ⲕ̣ⲏ ⲉϩⲣⲁⲓ̈ ⲉϫ̅ⲛ̅ ϯ{ϩⲓ}ⲏ ⲛ̅{ⲉⲓ} ⲉⲃⲟⲗ <text:line-break/><text:span text:style-name="T1"> </text:span><text:span text:style-name="T2">(76/21) </text:span> ⲛ̣̅ⲧⲉ ⲡⲣⲏ̣ ⲟ̅ⲗ̅ⲥ̅ⲏ̅ⲥ̅ ⲙ̅ⲛ̅ ⲩ̅̈ⲙⲛⲉⲟⲥ̅ <text:line-break/><text:span text:style-name="T1"> </text:span><text:span text:style-name="T2">(76/22) </text:span> ⲙ̅ⲛ̅ ⲉ̅ⲩ̣[ⲣ]ⲩ̣ⲙⲉ̣[ⲟ]ⲩ̣[ⲥ] ⲙ̅ⲛ̅ ⲛⲏ ⲉⲧ’‐ <text:line-break/><text:span text:style-name="T1"> </text:span><text:span text:style-name="T2">(76/23) </text:span> ⲕⲏ ⲉϩ̣ⲣⲁ̣ⲓ̈ ⲉϫ̅ⲛ̅ ⲡⲓ̣[ⲙⲟ]ⲉⲓⲧ[ ⲛ̅{ⲉⲓ} ⲉ‐ <text:line-break/><text:span text:style-name="T1"> </text:span><text:span text:style-name="T2">(76/24) </text:span> ϩⲟⲩⲛ ⲉⲡⲙ̅ⲧ̣ⲟⲛ ⲛ̅ⲧⲉ ⲡⲓ̣ⲱⲛ̅ϩ̅ <text:line-break/><text:span text:style-name="T1"> </text:span><text:span text:style-name="T2">(76/25) </text:span> ϣⲁ ⲉ̅ⲛ̅ⲉ̣̅̅ϩ̣ ⲫ̅ⲣ̣ⲓⲧⲁⲛ̣ⲓ̣ⲥ̣̅ ⲙ̅ⲛ̣̅ ⲙ̅ⲓⲕⲝⲁⲛ̅ <text:line-break/><text:span text:style-name="T1"> </text:span><text:span text:style-name="T2">(76/26) </text:span> [ⲑ̅ⲏ̅]̅ⲣ̅ⲁ̣̅̅ ⲙ̅ⲛ̅ ⲙ̅ⲓⲭⲁ̣ⲛⲟⲣⲁ̅ ⲙ̅ⲛ̅ ⲛⲓ <text:line-break/><text:span text:style-name="T1"> </text:span><text:span text:style-name="T2">(76/27) </text:span> [ⲣⲉϥⲁ]ⲣ[ⲉ]ϩ̣ ⲛ̅ⲧⲉ ⲛⲓⲯⲩⲭⲏ ⲉⲧ’ϩⲟⲧ̅ⲃ̅ <text:line-break/><text:span text:style-name="T1"> </text:span><text:span text:style-name="T2">(77/1) </text:span> ⲁ̅ⲕ̅ⲣ̅ⲁ̅ⲙ̅ⲁ̅ⲛ̅ ⲙ̅ⲛ̅ ⲥ̅ⲧ→ⲣ←ⲉⲙⲯⲟⲩⲭ[ⲟⲥ]̅ <text:line-break/><text:span text:style-name="T1"> </text:span><text:span text:style-name="T2">(77/2) </text:span> ⲙ̅ⲛ̅ ϯⲛⲟϭ ⲛ̅ϭⲟⲙ [ⲧ̅ⲉⲗⲙ]ⲁⲭⲁⲏ[ⲗ̅ <text:line-break/><text:span text:style-name="T1"> </text:span><text:span text:style-name="T2">(77/3) </text:span> ⲧ̅ⲉ̅ⲗ̅ⲙ̅ⲁ̅ⲭ̅ⲁ̅ⲏ̅ⲗ̅ ⲏ̅ⲗⲓ̅ ⲏ̣̅ⲗ̣ⲓ̅ ⲙ̅ⲁⲭⲁⲣ̅ <text:line-break/><text:soft-page-break/><text:span text:style-name="T1"> </text:span><text:span text:style-name="T2">(77/4) </text:span> ⲙ̅ⲁ̅ⲭ̅ⲁ̅ⲣ̅ ⲥ̅ⲏⲑ̅ ⲙ̅ⲛ̣̅ ⲡⲓⲛⲟϭ ⲛ̅ⲛⲁ̣[ⲧ] <text:line-break/><text:span text:style-name="T1"> </text:span><text:span text:style-name="T2">(77/5) </text:span> ⲛ̣ⲁⲩ ⲉⲣ[ⲟ]ϥ ⲁⲩⲱ ⲛ̅ⲁⲧ’ϫⲁϩⲙ[ⲉϥ ⲛ̅]‐ <text:line-break/><text:span text:style-name="T1"> </text:span><text:span text:style-name="T2">(77/6) </text:span> ⲁⲧ’ϯ ⲣⲁⲛ̣ ⲉⲣⲟϥ· ⲉⲧⲉ ⲡⲁⲓ̈ ϩ̅ⲛ̅ ⲟⲩ‐ <text:line-break/><text:span text:style-name="T1"> </text:span><text:span text:style-name="T2">(77/7) </text:span> ⲡ̅[̅ⲛ̅]̅ⲁ̅ ⲙ̅ⲛ̅ ⲟⲩⲥⲓⲅⲏ ⲙ̅ⲛ̅ ⲡⲓⲛⲟ̣ϭ [ⲛ̅]‐ <text:line-break/><text:span text:style-name="T1"> </text:span><text:span text:style-name="T2">(77/8) </text:span> ⲫⲱⲥⲧⲏⲣ ⲁ̅ⲣ̅ⲙ̅ⲟ̅ⲍ̅ⲏ̅ⲗ̣̅̅ ⲡ[ⲓⲙⲁ] ⲉⲧ̣[ϥ̅ⲙ̅]‐ <text:line-break/><text:span text:style-name="T1"> </text:span><text:span text:style-name="T2">(77/9) </text:span> ⲙⲟϥ ⲛ̅ϭⲓ ⲡⲓⲁⲩⲧⲟⲅ̣[ⲉ]ⲛ̣[ⲏⲥ ⲉ]ⲧⲟⲛ[ϩ̅] <text:line-break/><text:span text:style-name="T1"> </text:span><text:span text:style-name="T2">(77/10) </text:span> ⲡⲛ[ⲟ]ⲩⲧⲉ ϩ̅ⲛ̅ ⲟⲩⲙ̅ⲛ̅ⲧⲙⲉ ⲉϥ[ⲛ̅]ⲙ̣̅]‐ <text:line-break/><text:span text:style-name="T1"> </text:span><text:span text:style-name="T2">(77/11) </text:span> ⲙⲁϥ ⲛ̅ϭⲓ ⲡⲓⲁⲧ’ϫⲱϩ̅ⲙ̅ ⲛ̅ⲣⲱⲙⲉ̣ <text:line-break/><text:span text:style-name="T1"> </text:span><text:span text:style-name="T2">(77/12) </text:span> ⲁ̅ⲇ̅ⲁ̅ⲙ̅ⲁ̅ⲥ̅ ⲙ̅ⲛ̅ ⲟ̅ⲣⲟⲓ̈ⲁⲏⲗ̅ ⲡⲓⲙⲁ [ⲉⲧϥ̅]‐ <text:line-break/><text:span text:style-name="T1"> </text:span><text:span text:style-name="T2">(77/13) </text:span> ⲙ̅ⲙⲁⲩ ⲛ̅ϭⲓ ⲡⲓⲛⲟϭ ⲥⲏⲑ ⲙ̅ⲛ̅ ⲓ̣̅[ⲥ̅ ] <text:line-break/><text:span text:style-name="T1"> </text:span><text:span text:style-name="T2">(77/14) </text:span> ⲛ̅ⲧⲉ ⲡⲱⲛ̅ϩ̅· ⲡⲏ ⲉⲧⲁϥ{ⲉⲓ} ⲁⲩⲱ ⲁ[ϥ]‐ <text:line-break/><text:span text:style-name="T1"> </text:span><text:span text:style-name="T2">(77/15) </text:span> ⲉⲓϣⲉ̣ ⲙ̣̅ⲡⲏ ⲉⲧ’ϩⲁ̣ ⲡ̣[ⲛ]ⲟ̣ⲙⲟⲥ <text:line-break/><text:span text:style-name="T1"> </text:span><text:span text:style-name="T2">(77/16) </text:span> ⲡⲓⲙⲉϩϣⲟⲙⲉⲧ’ ⲇ̣[ⲁ̅ⲩ̅ⲉ̅ⲓ̅ⲑ̅ⲉ̅ ⲡⲓⲙⲁ] <text:line-break/><text:span text:style-name="T1"> </text:span><text:span text:style-name="T2">(77/17) </text:span> ⲉⲧⲟⲩⲙⲟⲧ̅ⲛ̅ ⲙ̅ⲙⲟⲟ̣[ⲩ] ⲛ̅ϩⲏⲧ̅[ϥ̅ ⲛ̅ϭⲓ] <text:line-break/><text:span text:style-name="T1"> </text:span><text:span text:style-name="T2">(77/18) </text:span> ⲛ̅ϣⲏ̣ⲣ̣ⲉ ⲙ̅ⲡⲓⲛⲟ[ϭ] ⲥ̅ⲏ̅ⲑ̅· ⲡ̣ⲓ̣ⲙ̣[ⲉϩ] <text:line-break/><text:span text:style-name="T1"> </text:span><text:span text:style-name="T2">(77/19) </text:span> ϥⲧⲟⲟⲩ ⲏ̅ⲗ̅ⲏ̅ⲗ̅ⲏ̅ⲑ̅ [ⲡⲓ]ⲙⲁ ⲉ̣[ ] <text:line-break/><text:span text:style-name="T1"> </text:span><text:span text:style-name="T2">(77/20) </text:span> ..[..]... ⲩ[ <text:line-break/><text:span text:style-name="T1"> </text:span><text:span text:style-name="T2">(77/21) </text:span> (lines 22 and following are missing) <text:line-break/><text:span text:style-name="T1"> </text:span><text:span text:style-name="T2">(78/1) </text:span> [...]ⲛ ⲉⲃⲟⲗ {ϩ̅ⲓ}ⲧⲟⲟⲧ̅ϥ̅ ⲙ̅ⲡⲏ ⲉⲧ’‐ <text:line-break/><text:span text:style-name="T1"> </text:span><text:span text:style-name="T2">(78/2) </text:span> [ⲟⲩ]ⲁ̣ⲁ̣ⲃ̣ ⲁ[ⲩⲱ ⲛ̅ⲁ]ⲧ’̣ϫⲱϩ̅ⲙ̅ ⲡ̅ⲓⲙⲁⲏⲗ̅ <text:line-break/><text:span text:style-name="T1"> </text:span><text:span text:style-name="T2">(78/3) </text:span> [ⲙ̅ⲛ̅] ⲛ̣ⲏ ⲉⲧ̅ⲛ̅ⲡ̣ϣⲁ ⲛ̅ⲛⲓϫⲱⲕ̅ⲙ̅ <text:line-break/><text:span text:style-name="T1"> </text:span><text:span text:style-name="T2">(78/4) </text:span> [ⲛ̅ⲧ]ⲉ ϯⲁⲡⲟⲧⲁⲅⲏ ⲙ̅ⲛ̅ ⲛⲓ̣ⲥⲫⲣⲁ̣‐ <text:line-break/><text:span text:style-name="T1"> </text:span><text:span text:style-name="T2">(78/5) </text:span> [ⲅⲓⲥ ⲛ̅]ⲛ̣ⲁⲧ’ϣⲁϫⲉ ⲙ̅ⲙⲟ[ⲟ]ⲩ ⲛ̅ⲧⲉ <text:line-break/><text:span text:style-name="T1"> </text:span><text:span text:style-name="T2">(78/6) </text:span> [ⲡⲉ]ⲩ̣ϫⲱⲕ̅ⲙ̅· [ⲛ]ⲁⲓ̈ ⲁⲩⲥⲟⲩⲱⲛ <text:line-break/><text:span text:style-name="T1"> </text:span><text:span text:style-name="T2">(78/7) </text:span> [ⲛⲉ]ⲩ̣ⲡ̣ⲁⲣⲁⲗⲏⲙⲇⲱⲣⲟⲥ ϩⲱ̣ⲥ <text:line-break/><text:span text:style-name="T1"> </text:span><text:span text:style-name="T2">(78/8) </text:span> [ⲁⲩ]ⲧ̣̅̅ⲥ̣̅̅[ⲃⲟⲟ]ⲩ̣ ⲉ̣ⲣⲟⲟⲩ ⲉⲁⲩⲉⲓⲙⲉ <text:line-break/><text:span text:style-name="T1"> </text:span><text:span text:style-name="T2">(78/9) </text:span> [ⲉⲃⲟⲗ {ϩ̅ⲓ}ⲧ]ⲟ̣ⲟ̣ⲧ̣ⲟⲩ ⲁⲩⲱ ⲛ̅ⲛ[ⲉ]ⲩ <text:line-break/><text:span text:style-name="T1"> </text:span><text:span text:style-name="T2">(78/10) </text:span> [ϫⲓ] ⲧ̣ⲡ̣ⲉ ⲙ̅ⲡⲙⲟⲩ· ⲓ̅̈̅ⲉ̅ⲥ̣̅̅ⲥ̣̅̅ⲉ̅ⲟ̅ⲥ̅ <text:line-break/><text:span text:style-name="T1"> </text:span><text:span text:style-name="T2">(78/11) </text:span> [ⲟ̅ⲏ̅]̅ⲱ̅ ⲏ̅ⲟⲩⲱ̅ ⲱ̅ⲩⲁ̅ ϩ̅ⲛ̅ ⲟⲩⲙ̅ⲛ̅‐ <text:line-break/><text:span text:style-name="T1"> </text:span><text:span text:style-name="T2">(78/12) </text:span> [ⲧⲙ]ⲉ ⲛⲁⲙⲉ ⲓ̅̈̅ⲉ̅ⲥ̅ⲥ̅ⲉ̅ⲟ̅ⲥ̅ ⲙ̅ⲁⲥⲁⲣⲉⲟⲥ̅ <text:line-break/><text:span text:style-name="T1"> </text:span><text:span text:style-name="T2">(78/13) </text:span> [ⲓ̅̈̅ⲉ̅ⲥ̅ⲥ̅]̅ⲉ̣̅̅ⲇ̅ⲉ̅ⲕ̅ⲉ̅ⲟ̅ⲥ̅ ⲡⲓⲙⲟⲟ̣ⲩ ⲉⲧⲟⲛ̅ϩ̅ <text:line-break/><text:span text:style-name="T1"> </text:span><text:span text:style-name="T2">(78/14) </text:span> [ⲡ]ⲁ̣ⲗ̣ⲟ]ⲩ̣ ⲛ̅ⲧⲉ ⲡⲁⲗⲟ̣ⲩ· ⲡ̣[ⲓⲣ]ⲁⲛ <text:line-break/><text:span text:style-name="T1"> </text:span><text:span text:style-name="T2">(78/15) </text:span> [ⲛ̅ⲧⲉ ⲛⲓ]ⲉ̣[ⲟⲟⲩ] ⲧ̣ⲏⲣⲟⲩ ϩ̅ⲛ̅ ⲟⲩⲙ̅ⲛ̅‐ <text:line-break/><text:span text:style-name="T1"> </text:span><text:span text:style-name="T2">(78/16) </text:span> [ⲧⲙ]ⲉ ⲛ̣ⲁ̣[ⲙⲉ] ⲡ̣ⲉⲧ’ϣⲟⲟ̣ⲡ’ ϣⲁ ⲉ‐ <text:line-break/><text:span text:style-name="T1"> </text:span><text:span text:style-name="T2">(78/17) </text:span> [ⲛ]ⲉ̣ϩ̣ⲓ̣̅̅ⲓ̣̅̅ⲓ̣̅̅ⲓ̣̅̅[ⲏ̅]ⲏ̣ⲏ̣ⲏ̅ ⲉ̅ⲉⲉⲉ̣̅ ⲟ̣̅ⲟⲟⲟ̅ <text:line-break/><text:span text:style-name="T1"> </text:span><text:span text:style-name="T2">(78/18) </text:span> [ⲩ̅ⲩ̅]̅ⲩ̣̅̅[̅ⲩ̅] ⲱ̣̅ⲱⲱⲱ̅ ⲁ̅ⲁⲁⲁ̅ ϩ̣̅[ⲛ̅] <text:line-break/><text:span text:style-name="T1"> </text:span><text:span text:style-name="T2">(78/19) </text:span> [ⲟⲩⲙ̅ⲛ̅ⲧⲙⲉ ⲛⲁ]ⲙ[ⲉ] ⲟ̣ⲏ̣̅[ⲓ̅ ⲁ̅ⲁⲁⲁ̅ <text:line-break/><text:span text:style-name="T1"> </text:span><text:span text:style-name="T2">(78/20) </text:span> (lines 20 and following are missing) <text:line-break/><text:span text:style-name="T1"> </text:span><text:span text:style-name="T2">(79/1) </text:span> ⲉⲛⲉϩ ⲉⲧ’ϣⲟⲟⲡ’ ϩ̅ⲛ̅ [ⲡⲓϩⲏⲧ’] <text:line-break/><text:span text:style-name="T1"> </text:span><text:span text:style-name="T2">(79/2) </text:span> ⲡⲓϣⲁ ⲉⲛⲉϩ · ⲩ̣̅̅[̅ⲁ̅ⲉ̅ⲓ̅ ⲉ̅ⲓⲥⲁⲉⲓ̅] <text:line-break/><text:span text:style-name="T1"> </text:span><text:span text:style-name="T2">(79/3) </text:span> ⲉ[̅ⲓ̅ⲟ̅] ⲉ̅ⲓ̣ⲉⲓ̅ ⲟⲥⲉ[ⲓ· ⲡⲉⲓ̈ⲛⲟ· ⲛ̅ⲣⲁⲛ] <text:line-break/><text:span text:style-name="T1"> </text:span><text:span text:style-name="T2">(79/4) </text:span> ⲟⲩ̣[.. ⲟ]ⲩⲙⲉⲣⲟ̣[ⲥ <text:line-break/><text:span text:style-name="T1"> </text:span><text:span text:style-name="T2">(79/5) </text:span> ⲧⲙⲏ[...] ⲁⲓ̈ⲟⲩ[ ⲡⲓⲁ] <text:line-break/><text:span text:style-name="T1"> </text:span><text:span text:style-name="T2">(79/6) </text:span> ⲧ̣̅̅ⲣ̅ϩⲁⲉ· ⲉⲩϫⲡⲟ ⲉ̣[ⲃⲟⲗ ⲙ̅ⲙⲟϥ ⲙⲁⲩ] <text:line-break/><text:span text:style-name="T1"> </text:span><text:span text:style-name="T2">(79/7) </text:span> ⲁⲁϥ̣ ⲡⲉ̣ ⲉⲩⲉⲝ[ⲟⲩⲥⲓⲁ ⲉⲃⲟⲗ ⲙ̅]‐ <text:line-break/><text:span text:style-name="T1"> </text:span><text:span text:style-name="T2">(79/8) </text:span> ⲙⲟϥ ⲙⲁⲩⲁⲁϥ ⲡⲉ ⲡ̣[ⲏ ⲉⲧⲉ ⲛ̅ⲛⲁⲧ] <text:line-break/><text:span text:style-name="T1"> </text:span><text:span text:style-name="T2">(79/9) </text:span> ⲛⲁⲩ ⲉ̣[ⲣ]ⲟ̣ϥ ⲥⲁⲃⲟⲗ ⲙ̅ⲙ̣[ⲟⲓ̈ ⲡⲏ ⲉⲧⲉ] <text:line-break/><text:soft-page-break/><text:span text:style-name="T1"> </text:span><text:span text:style-name="T2">(79/10) </text:span> ⲛ̅ⲛⲁⲧⲛⲁ̣ⲩ̣ ⲉⲣⲟϥ ⲛ̅ⲛ[ⲟⲩⲟⲛ ⲛⲓⲙ·] <text:line-break/><text:span text:style-name="T1"> </text:span><text:span text:style-name="T2">(79/11) </text:span> ⲟⲩ ⲅⲁⲣ ⲡⲉⲧ’ϣ〈ⲱ〉ⲡ’̣ [ⲙ̅ⲙⲟⲕ ϩ̅ⲛ̅ ⲟⲩ]‐ <text:line-break/><text:span text:style-name="T1"> </text:span><text:span text:style-name="T2">(79/12) </text:span> ⲥⲙⲏ ⲙ̅ⲛ̅ ⲟⲩⲥⲙⲟⲩ̣ [ⲉⲁⲓ̈ⲥⲟⲩⲱⲛ̅ⲕ̅] <text:line-break/><text:span text:style-name="T1"> </text:span><text:span text:style-name="T2">(79/13) </text:span> ⲁⲛⲟⲕ ϯⲛⲟⲩ ⲁⲓ̈ⲙⲟⲩ[ϫ̅ⲧ̅’̅ ⲙ̅ⲛ̅ ⲡⲉⲕ]‐ <text:line-break/><text:span text:style-name="T1"> </text:span><text:span text:style-name="T2">(79/14) </text:span> ⲧⲱϭⲉ· ⲁⲩⲱ [ⲁ]ⲓ̣̈[ϩⲱⲱⲕ ⲙ̅ⲙⲟⲓ̈] <text:line-break/><text:span text:style-name="T1"> </text:span><text:span text:style-name="T2">(79/15) </text:span> ⲁⲓ̈ϣⲱⲡ̣ⲉ̣ [ϩ̅]̅ⲛ̅ ⲟ[ⲩϩⲟⲡⲗⲟⲛ ⲛ̅ⲧⲉ ⲡⲓ]‐ <text:line-break/><text:span text:style-name="T1"> </text:span><text:span text:style-name="T2">(79/16) </text:span> ϩⲙⲟⲧ’ ⲙ̅ⲛ̅ ⲡⲓⲟⲩ[ⲟⲉⲓⲛ ⲁⲓ̈ⲣ̅ⲟⲩⲟⲉⲓⲛ] <text:line-break/><text:span text:style-name="T1"> </text:span><text:span text:style-name="T2">(79/17) </text:span> ⲁⲩⲱ ⲉⲃ̣ⲟⲗ {ϩ̅ⲓ}ⲧⲟⲟ̣[ⲧ̅ϥ̅ ⲁⲓ̈ⲡⲱⲣ̅ϣ̅ ⲛ̅]‐ <text:line-break/><text:span text:style-name="T1"> </text:span><text:span text:style-name="T2">(79/18) </text:span> ⲛⲁϭⲓϫ [ⲉⲃ]ⲟⲗ ⲉ̣[ⲩⲕⲏⲃ· ⲁⲩⲱ ⲁⲓ̈ϫⲓ] <text:line-break/><text:span text:style-name="T1"> </text:span><text:span text:style-name="T2">(79/19) </text:span> ⲙⲟⲣⲫⲏ̣[..]. ⲛ[ <text:line-break/><text:span text:style-name="T1"> </text:span><text:span text:style-name="T2">(79/20) </text:span> ⲛ̣̅ⲛⲟⲩⲕ̣ⲁⲗⲩ[ⲙⲙⲁ ⲛ̅ⲧⲉ ϯⲙ̅ⲛ̅ⲧⲣ̅ⲙ̅ <text:line-break/><text:span text:style-name="T1"> </text:span><text:span text:style-name="T2">(79/21) </text:span> ⲙⲁⲟ ⲉⲥⲕⲱⲧ̣[ⲉ <text:line-break/><text:span text:style-name="T1"> </text:span><text:span text:style-name="T2">(79/22) </text:span> ⲛ̅ⲟⲩⲙⲏ[ⲧⲣⲁ <text:line-break/><text:span text:style-name="T1"> </text:span><text:span text:style-name="T2">(79/23) </text:span> ϩ̅ⲛ̣̅̅ ⲟⲩⲉⲓⲛ[ⲉ <text:line-break/><text:span text:style-name="T1"> </text:span><text:span text:style-name="T2">(79/24) </text:span> [ <text:line-break/><text:span text:style-name="T1"> </text:span><text:span text:style-name="T2">(79/25) </text:span> ϩ̅ⲛ̅ ⲟⲩⲙ̅ⲛ̅ⲧ[ⲙⲉ ϫⲉ ⲁⲓ̈ⲣ̅ⲭⲱⲣⲓ ⲙ̅]‐ <text:line-break/><text:span text:style-name="T1"> </text:span><text:span text:style-name="T2">(79/26) </text:span> ⲙⲟⲕ ⲓ̅ⲥ̅ ⲛ̅ⲧⲉ ⲡⲏ ⲉⲧ’̣[ <text:line-break/><text:span text:style-name="T1"> </text:span><text:span text:style-name="T2">(79/27) </text:span> ⲏ̅ⲉ̅ⲉ̅ ⲁ̅ⲓⲉⲉ̅ ⲟ̅ⲓⲥ̅ [ⲱ <text:line-break/><text:span text:style-name="T1"> </text:span><text:span text:style-name="T2">(80/1) </text:span> [ ⲉ]ⲧⲟⲩⲁⲁⲃ ⲡⲛⲟⲩⲧⲉ <text:line-break/><text:span text:style-name="T1"> </text:span><text:span text:style-name="T2">(80/2) </text:span> [ⲛ̅ⲧⲉ ϯⲥⲓⲅⲏ ...]... [ⲛ̅ⲧ]ⲟⲕ ⲡ̣ⲉ̣ <text:line-break/><text:span text:style-name="T1"> </text:span><text:span text:style-name="T2">(80/3) </text:span> [ ]ⲛ̣̅ⲙ̅ⲧⲟⲛ ⲛ̅ⲧ̣[ⲉ ⲡ]ϣⲏ‐ <text:line-break/><text:span text:style-name="T1"> </text:span><text:span text:style-name="T2">(80/4) </text:span> [ⲣⲉ ]ⲉⲧ̣ϣ̣ⲟ̣[ⲟⲡ’] ϩ̣ⲛ̅ <text:line-break/><text:span text:style-name="T1"> </text:span><text:span text:style-name="T2">(80/5) </text:span> [ ] ⲡⲓⲙⲁ[ⲉⲓ]ⲛ ⲡⲓⲙⲁ̣ <text:line-break/><text:span text:style-name="T1"> </text:span><text:span text:style-name="T2">(80/6) </text:span> [ ] ⲛ̅ⲟⲩⲣⲱⲙⲉ ⲁⲕⲧ̣[ⲃ] <text:line-break/><text:span text:style-name="T1"> </text:span><text:span text:style-name="T2">(80/7) </text:span> [ⲃⲟ ⲙ̅ⲙⲟⲓ̈ ⲛ̅ϩⲏⲧ̅ϥ̅] ϩ̅ⲙ̅ ⲡⲉⲕⲱⲛ̣̅ϩ̣̅ <text:line-break/><text:span text:style-name="T1"> </text:span><text:span text:style-name="T2">(80/8) </text:span> [ⲕⲁⲧⲁ ⲡⲉⲕⲣⲁⲛ ⲛ̅]ⲛ̣ⲁⲧ’ϥⲱ̣ⲧ̣ⲉ ⲉⲃⲟⲗ <text:line-break/><text:span text:style-name="T1"> </text:span><text:span text:style-name="T2">(80/9) </text:span> [ⲉⲧⲃⲉ ⲡⲁⲓ̈ ϥϣⲟ]ⲟⲡ’ ⲛ̅ϩⲏⲧ̅ϥ̅ ⲛ̅ϭⲓ ⲟⲩ <text:line-break/><text:span text:style-name="T1"> </text:span><text:span text:style-name="T2">(80/10) </text:span> [ⲥⲧⲟⲉⲓ ⲛ̅ⲧⲉ ⲡⲱ]ⲛ̅ϩ̅ · ⲉⲁϥ̣ϭ̣ⲱ̣ⲣ̅ϭ̅ ϩ̅ⲛ̅ <text:line-break/><text:span text:style-name="T1"> </text:span><text:span text:style-name="T2">(80/11) </text:span> [ⲟⲩⲙⲟⲟⲩ ⲛ̅ϫ]ⲱⲕ̅ⲙ̅ ⲛ̅[ⲧⲉ] ⲛⲓⲁⲣⲭⲱⲛ <text:line-break/><text:span text:style-name="T1"> </text:span><text:span text:style-name="T2">(80/12) </text:span> [ⲧⲏⲣⲟⲩ ⲉⲧⲣⲁⲱ]ⲛ̅ϩ̅ ϩⲁ̣ⲧ̣ⲟⲟⲧ̅ⲕ̅ ϩ̅ⲛ̅ ⲟⲩ‐ <text:line-break/><text:span text:style-name="T1"> </text:span><text:span text:style-name="T2">(80/13) </text:span> [ⲓⲣⲏⲛⲏ ⲛ̅ⲧⲉ ⲛⲉⲧ’ⲟⲩ]ⲁ̣ⲁ̣ⲃ̣ [ⲡⲓ]ϣⲁ ⲉⲛⲉϩ <text:line-break/><text:span text:style-name="T1"> </text:span><text:span text:style-name="T2">(80/14) </text:span> [ⲡⲏ ⲉⲧϣⲟⲟⲡ’] ϩ̣̅̅[̅ⲛ̅] ⲟ̣ⲩ̣ⲙ̅ⲛ̣ⲧⲙⲉ ⲛⲁ‐ <text:line-break/><text:span text:style-name="T1"> </text:span><text:span text:style-name="T2">(80/15) </text:span> [ⲙⲉ· ⲡⲉⲓ̈ϫⲱⲱ]ⲙⲉ̣ [ⲁ]ϥ̣ⲥ̣ⲁϩ̅ϥ̅ ⲛ̅ϭⲓ <text:line-break/><text:span text:style-name="T1"> </text:span><text:span text:style-name="T2">(80/16) </text:span> [ⲡⲓⲛⲟϭ ⲥ̅ⲏ̅ⲑ̅ ⲁⲩⲱ] ⲁϥⲕⲁⲁϥ ⲛ̅ϩⲣⲁⲓ̈ {ϩⲓ} <text:line-break/><text:span text:style-name="T1"> </text:span><text:span text:style-name="T2">(80/17) </text:span> [ϫ̅ⲛ̅ ⲟⲩⲧⲟⲟⲩ ⲉϥ]ϫⲟⲥⲉ ⲡⲏ ⲉⲧⲉ ⲙⲁ‐ <text:line-break/><text:span text:style-name="T1"> </text:span><text:span text:style-name="T2">(80/18) </text:span> [ⲣⲉⲡⲣⲏ ϣⲁ ⲉϩⲣⲁⲓ̈ ⲉϫⲱϥ] ⲟⲩⲧⲉ <text:line-break/><text:span text:style-name="T1"> </text:span><text:span text:style-name="T2">(80/19) </text:span> [ ]ⲉ[...] ⲁⲩⲱ ⲛ̅‐ <text:line-break/><text:span text:style-name="T1"> </text:span><text:span text:style-name="T2">(80/20) </text:span> [ϫⲓⲛ ⲛⲉϩⲟⲟⲩ ⲛ̅ⲛⲓⲡⲣ]ⲟⲫⲏⲧⲏⲥ ⲙ̣[ⲛ̅] <text:line-break/><text:span text:style-name="T1"> </text:span><text:span text:style-name="T2">(80/21) </text:span> [ ⲙ̅ⲛ̅ ⲛⲓ]ⲁ̣ⲡⲟⲥⲧⲟⲗⲟⲥ <text:line-break/><text:span text:style-name="T1"> </text:span><text:span text:style-name="T2">(80/22) </text:span> [ ]ⲙ̅ⲛ̅ⲥ̣ⲱ[ <text:line-break/><text:span text:style-name="T1"> </text:span><text:span text:style-name="T2">(80/23) </text:span> [ ]{ⲉ̅ⲓ} ⲉⲃ̣[ⲟⲗ <text:line-break/><text:span text:style-name="T1"> </text:span><text:span text:style-name="T2">(80/24) </text:span> [ ⲁⲩⲱ ⲡⲉⲩ]ⲙⲁ <text:line-break/><text:span text:style-name="T1"> </text:span><text:span text:style-name="T2">(80/25) </text:span> [ϫⲉ ⲙ̅ⲡ̅ϥ̅ⲥⲱⲧ̅ⲙ̅ ⲉ]ⲣ̣ⲟⲥ· <text:line-break/><text:span text:style-name="T1"> </text:span><text:span text:style-name="T2">(80/26) </text:span> [ⲡⲉⲓ̈ϫⲱⲱⲙⲉ ⲁϥ]ⲥⲁϩ̅ϥ̅ ⲛ̅ϭⲓ ⲡⲓⲛⲟϭ <text:line-break/><text:span text:style-name="T1"> </text:span><text:span text:style-name="T2">(81/1) </text:span> ⲥ̅ⲏ̅ⲑ̅ ϩ̅ⲛ̅ ϩⲉⲛⲥϩⲁⲓ̈ [ <text:line-break/><text:span text:style-name="T1"> </text:span><text:span text:style-name="T2">(81/2) </text:span> ⲁϥⲕⲁ̣ⲁ̣ϥ̣ ϩ̣̅̅.̅[...].[ <text:line-break/><text:soft-page-break/><text:span text:style-name="T1"> </text:span><text:span text:style-name="T2">(81/3) </text:span> (lines 3 and following are missing) <text:line-break/><text:span text:style-name="T1"> </text:span><text:span text:style-name="T2">(82/1) </text:span> (only a blank top fragment of IV 82 survives)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2:44:26.074149700</meta:creation-date>
    <meta:generator>LibreOffice/26.2.1.2$Windows_X86_64 LibreOffice_project/620$Build-2</meta:generator>
    <dc:date>2026-03-24T12:45:54.306900800</dc:date>
    <meta:editing-duration>PT1M28S</meta:editing-duration>
    <meta:editing-cycles>1</meta:editing-cycles>
    <meta:document-statistic meta:table-count="0" meta:image-count="0" meta:object-count="0" meta:page-count="44" meta:paragraph-count="4" meta:word-count="10707" meta:character-count="77990" meta:non-whitespace-character-count="61278"/>
  </office:meta>
</office:document-meta>
</file>