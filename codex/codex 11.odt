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P4" style:family="paragraph" style:parent-style-name="Standard">
      <style:text-properties style:font-name="Antinoou" officeooo:paragraph-rsid="00110f2d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XI ) The Interpretation of Knowledge</text:p>
      <text:p text:style-name="P2"><text:span text:style-name="T1"> </text:span><text:span text:style-name="T2">(0/1) </text:span> (ⲃ) [ⲑ]ⲉ̣ⲣ̣[ⲙⲏⲛⲓⲁ] <text:line-break/><text:span text:style-name="T1"> </text:span><text:span text:style-name="T2">(0/2) </text:span> (ⲃ) ⲛ̅ⲧⲅ̣[ⲛⲱⲥⲓⲥ] <text:line-break/><text:span text:style-name="T1"> </text:span><text:span text:style-name="T2">(1/11) </text:span> (Lines 1--11 lacking) <text:line-break/><text:span text:style-name="T1"> </text:span><text:span text:style-name="T2">(1/12) </text:span> [ 14+- ⲁ]ⲃⲁⲗ̣[ <text:line-break/><text:span text:style-name="T1"> </text:span><text:span text:style-name="T2">(1/13) </text:span> [ 6+- ].[ 7+- ].ⲁⲧⲛ̣[ <text:line-break/><text:span text:style-name="T1"> </text:span><text:span text:style-name="T2">(1/14) </text:span> [ⲁⲩⲣ̅ⲡⲓ]ⲥ̣ⲧⲉⲩⲉ̣ ⲁⲃ̣[ⲁⲗ] ϩ̣ⲓⲧⲛ̅ [ϩⲛ̅ⲙⲁⲉⲓ]‐ <text:line-break/><text:span text:style-name="T1"> </text:span><text:span text:style-name="T2">(1/15) </text:span> [ⲛ̅ ⲙ̅ⲛ̅ ϩⲛ̅ϣ]ⲡⲏⲣⲉ ⲙ̣[ⲛ̅ ϩ]ⲛ̅ⲡⲗⲁ[ⲥⲙⲁ] <text:line-break/><text:span text:style-name="T1"> </text:span><text:span text:style-name="T2">(1/16) </text:span> [ⲡⲓⲧⲁⲛⲧ]ⲛ̣̅ ⲉⲧⲁϩϣⲱⲡⲉ ϩⲓⲧ[ⲟⲟⲧⲟⲩ] <text:line-break/><text:span text:style-name="T1"> </text:span><text:span text:style-name="T2">(1/17) </text:span> [ⲁϥⲟⲩⲁ]ϩ̅ⲃ̅ ⲛ̅ⲥⲱϥ ⲁⲗⲗⲁ ϩⲓⲧ̣[ⲛ̅ ϩ̅ⲛ̅]‐ <text:line-break/><text:span text:style-name="T1"> </text:span><text:span text:style-name="T2">(1/18) </text:span> [ⲛⲁϭⲛ̅ϭ] ⲙ̣̅̅ⲛ̅ ϩ̅ⲛ̅ϣⲱ̣ⲥ ⲉⲙⲡ̣[ⲁⲧⲟⲩϫⲓ] <text:line-break/><text:span text:style-name="T1"> </text:span><text:span text:style-name="T2">(1/19) </text:span> [ⲛ̅ⲧⲉⲡⲓⲃⲟⲗ]ⲏ ⲛ̅ⲟⲩⲑⲉⲱⲣⲓⲁ ⲁ̣[ⲩⲡⲱⲧ] <text:line-break/><text:span text:style-name="T1"> </text:span><text:span text:style-name="T2">(1/20) </text:span> [ⲁⲃⲁⲗ ⲉⲙⲡ]ⲟ̣ⲩⲥⲱⲧ̅ⲙ̅ ⲙ̅ⲙ̣ⲁ̣[ϥ ⲁⲡⲉⲭ]‐ <text:line-break/><text:span text:style-name="T1"> </text:span><text:span text:style-name="T2">(1/21) </text:span> [ⲣⲏⲥⲧⲟⲥ ϫⲉ] ⲁⲩⲣ̅ⲥⲧⲁ̣ⲩ̣[ⲣⲟⲩ ⲙ̅ⲙⲁϥ] <text:line-break/><text:span text:style-name="T1"> </text:span><text:span text:style-name="T2">(1/22) </text:span> [ⲁⲗⲗⲁ ⲉⲣⲉⲧⲛ̅ⲅ]ⲉⲛⲉ̣ⲁ̣ {ϥ̣}ⲡⲏⲧ̣ ⲉ̣ⲙⲡ̣[ⲁ]‐ <text:line-break/><text:span text:style-name="T1"> </text:span><text:span text:style-name="T2">(1/23) </text:span> [ⲧ̅ⲥ̅ⲣ̅ⲡⲓⲥⲧⲉⲩⲉ ⲁⲛ ⲁⲣ]ⲁ̣[ϥ] ϫ̣[ⲉ ⲡ]ⲉ̣ⲭ̣[ⲣⲏ]‐ <text:line-break/><text:span text:style-name="T1"> </text:span><text:span text:style-name="T2">(1/24) </text:span> [ⲥⲧⲟⲥ ⲁⲁⲛ̅ϩ̅ ϫⲉⲕⲁ]ⲥⲉ ⲉⲣⲉⲧ̅ⲛ̅ⲡⲓⲥ̣[ⲧⲓⲥ] <text:line-break/><text:span text:style-name="T1"> </text:span><text:span text:style-name="T2">(1/25) </text:span> [ⲛⲁϣⲱ]ⲡ̣ⲉ ⲉⲥ̣ⲟ̣ⲩ̣[ⲁ]ⲁⲃ ⲉⲥⲧⲟⲩⲃⲏⲩ [ⲉⲥ]‐ <text:line-break/><text:span text:style-name="T1"> </text:span><text:span text:style-name="T2">(1/26) </text:span> [ⲕⲱⲉ ⲉ]ⲛ̣ ⲁⲣⲁⲥ ⲉⲥ̅ⲣ̅ⲉⲛⲉⲣⲅⲉⲓ ⲁⲗⲗ[ⲁ ⲉⲥ]‐ <text:line-break/><text:span text:style-name="T1"> </text:span><text:span text:style-name="T2">(1/27) </text:span> [ⲕⲱⲉ ⲙ̅]ⲙ̣ⲁⲥ ⲉⲥⲧⲏϭ ⲛ̅ϩⲣⲏⲉⲓ ⲛ̣̅[ϩⲏ]‐ <text:line-break/><text:span text:style-name="T1"> </text:span><text:span text:style-name="T2">(1/28) </text:span> [ⲧ̅ϥ̅ ⲙ̅ⲡ̅ⲣ̅]ϫⲟⲟϥ ϫⲉ ⲁⲃⲁⲗ ϩ̅ⲛ̅ ⲟⲩⲟ[ⲩ]‐ <text:line-break/><text:span text:style-name="T1"> </text:span><text:span text:style-name="T2">(1/29) </text:span> [ⲧⲉ ⲧϩⲩ]ⲡ̣ⲟⲙⲟⲛⲏ ⲁϣⲓ ⲛ̅ⲡⲓⲥⲧ[ⲓⲥ] <text:line-break/><text:span text:style-name="T1"> </text:span><text:span text:style-name="T2">(1/30) </text:span> [ⲉⲣⲉⲡ]ⲟ̣ⲩⲉ̣ⲉⲓ ⲡⲟⲩⲉⲉⲓ ⲅⲁⲣ ⲣ̅ⲡⲉⲓ[ⲑⲉ] <text:line-break/><text:span text:style-name="T1"> </text:span><text:span text:style-name="T2">(1/31) </text:span> [ϩ̅ⲛ̅ ⲛⲉ]ⲧ̣ϥⲣ̅ⲡⲓⲥⲧⲉⲩⲉ ⲁⲣⲁⲩ ⲉⲓϣ̣[ⲡⲉ] <text:line-break/><text:span text:style-name="T1"> </text:span><text:span text:style-name="T2">(1/32) </text:span> ϥ̣ⲣ̣̅[ⲁⲡⲓⲥ]ⲧ̣ⲉⲓ ⲁⲣⲁⲩ ϩⲓⲉ ⲛ̅ⲛⲉϣⲡ̣[ⲉ] <text:line-break/><text:span text:style-name="T1"> </text:span><text:span text:style-name="T2">(1/33) </text:span> [ⲉⲓ ⲣ̅ⲡⲉⲓⲑ]ⲉ· ⲟⲩⲛⲁϭ ⲇⲉ ⲛ̅ϩⲱϥ ⲡ̣[ⲉ] <text:line-break/><text:span text:style-name="T1"> </text:span><text:span text:style-name="T2">(1/34) </text:span> ⲛ̣̅ⲛⲟⲩⲣⲱⲙⲉ ⲉⲩⲛ̅ⲧⲉϥ ⲙ̅ⲙⲉⲩ [ⲛ̅ⲧ]‐ <text:line-break/><text:span text:style-name="T1"> </text:span><text:span text:style-name="T2">(1/35) </text:span> ⲡⲓⲥⲧⲓ̣[ⲥ ⲉ]ϥ̣ϩ̣̅̅ⲛ̅ ⲧⲙ̅ⲛⲧ̅ⲁⲧⲛⲁϩⲧ̣[ⲉ ⲉⲛ]‐ <text:line-break/><text:span text:style-name="T1"> </text:span><text:span text:style-name="T2">(1/36) </text:span> ⲉ̣ⲧ̣ⲉ̣ [ⲡⲕⲟⲥ]ⲙⲟⲥ ⲡ̣ⲉ· ⲡⲕⲟⲥⲙ[ⲟⲥ ⲛ̅ⲇⲉ] <text:line-break/><text:span text:style-name="T1"> </text:span><text:span text:style-name="T2">(1/37) </text:span> [ⲡⲉ ⲡⲙⲁ ⲛ̅ⲧ]ⲙ̅ⲛ̅ⲧ̅ⲁⲧⲛⲁϩⲧⲉ ⲁ̣[ⲩⲱ ⲡ]‐ <text:line-break/><text:span text:style-name="T1"> </text:span><text:span text:style-name="T2">(1/38) </text:span> [ⲙⲁ ⲙ̅ⲡⲙⲟⲩ ⲉ]ⲣ̣ⲉⲡⲙⲟⲩ ⲇⲉ ϣ̣[ⲟⲟⲡ ⲛ̅]‐ <text:line-break/><text:span text:style-name="T1"> </text:span><text:span text:style-name="T2">(2/11) </text:span> (Lines 1--11 lacking) <text:line-break/><text:span text:style-name="T1"> </text:span><text:span text:style-name="T2">(2/12) </text:span> [ 6+- ] ⲛ̣.[ <text:line-break/><text:span text:style-name="T1"> </text:span><text:span text:style-name="T2">(2/13) </text:span> [ 6+- ]ⲥ ϫⲉ̣ [ <text:line-break/><text:span text:style-name="T1"> </text:span><text:span text:style-name="T2">(2/14) </text:span> [ 7+- ]ⲁⲣⲧ̣[..]..[.]. ⲧ̣ⲛ.[ <text:line-break/><text:span text:style-name="T1"> </text:span><text:span text:style-name="T2">(2/15) </text:span> [....ⲧⲁ]ⲛⲧⲛ̅ [ⲁⲩⲱ] ⲥⲉⲛⲁⲣⲁ̣[ⲡⲓⲥⲧⲉⲓ] <text:line-break/><text:span text:style-name="T1"> </text:span><text:span text:style-name="T2">(2/16) </text:span> [ⲟⲩⲡⲉⲧ]ⲟⲩⲁⲁⲃ̣ ⲧ̣ⲉ ⲧⲡⲓⲥⲧ̣[ⲓⲥ ⲁⲛⲉⲩ] <text:line-break/><text:span text:style-name="T1"> </text:span><text:span text:style-name="T2">(2/17) </text:span> [ⲁⲡⲧⲁⲛⲁ5̅0̅ⲧ̅]̅ⲛ̣̅̅50 ⲡⲉⲛⲁ̣[ⲛ]ⲧⲓⲟⲛ ⲡⲉ ⲧ̣[ⲁⲡⲓⲥⲧⲓ]‐ <text:line-break/><text:span text:style-name="T1"> </text:span><text:span text:style-name="T2">(2/18) </text:span> [ⲁ ⲁⲡⲧⲁⲛ]ⲧ̣ⲛ̣̅· ⲛⲉⲧϥⲁⲧ̅ⲛ̅ ⲛⲉ̣[ⲩ ⲙ̅ⲙⲁⲩ] <text:line-break/><text:span text:style-name="T1"> </text:span><text:span text:style-name="T2">(2/19) </text:span> [ⲥⲉⲛⲁϥⲓ ϩⲁ]ⲣⲁⲩ ⲛ̣ⲉⲙⲛϣϭ̣[ⲁⲙ ⲙ̅ⲙⲁⲩ] <text:line-break/><text:span text:style-name="T1"> </text:span><text:span text:style-name="T2">(2/20) </text:span> [ⲁⲙⲉⲉⲧⲉ] ⲁ̣ⲧ̣ⲙ̣̅̅ⲛ̅ⲧ̅ⲁⲧⲧⲉⲕⲟ̣ [ <text:line-break/><text:span text:style-name="T1"> </text:span><text:span text:style-name="T2">(2/21) </text:span> [ 9+- ]ⲛ̣ⲁϣⲱ̣[ⲡⲉ <text:line-break/><text:span text:style-name="T1"> </text:span><text:span text:style-name="T2">(2/22) </text:span> [....]ⲁ̣ⲩ̣[.....]ⲃ̣ⲱⲗ [ⲁⲃⲁⲗ <text:line-break/><text:span text:style-name="T1"> </text:span><text:span text:style-name="T2">(2/23) </text:span> [....].ⲓ.̅[..].[ <text:line-break/><text:span text:style-name="T1"> </text:span><text:span text:style-name="T2">(2/24) </text:span> [ⲛⲉⲧ]ⲁ̣ϩⲟⲩ̣ϫⲁⲩ̣ ϩ̣[ <text:line-break/><text:span text:style-name="T1"> </text:span><text:span text:style-name="T2">(2/25) </text:span> [ⲡⲉⲧ]ϩ̅ϭ̅ϩⲁϭⲧ ⲅ̣ⲁⲣ̣ [ⲛ]ⲁ̣ⲣ̣̅ⲡ̣ⲓ̣ⲥ̣[ⲧⲉⲩⲉ ⲉⲛ]‐ <text:line-break/><text:span text:style-name="T1"> </text:span><text:span text:style-name="T2">(2/26) </text:span> [ⲙ̅ⲛ̅ϣ]ϭⲁⲙ ⲙ̅ⲙⲁϥ ⲁⲉⲓⲛⲉ ⲛ̅ⲟ̣[ⲩⲛⲁϭ ⲛ̅]‐ <text:line-break/><text:span text:style-name="T1"> </text:span><text:span text:style-name="T2">(2/27) </text:span> [ⲉⲕⲕⲗ]ⲏ̣ⲥ̣ⲓⲁ ⲉⲥⲥⲁⲩϩ ⲁⲃⲁⲗ ϩ̅ⲛ̅ [ⲟⲩⲥⲁⲩ]‐ <text:line-break/><text:soft-page-break/><text:span text:style-name="T1"> </text:span><text:span text:style-name="T2">(2/28) </text:span> [ϩ̅ⲥ̅ ⲛ̅ⲕ]ⲟⲩⲉⲓ ⲁϥϣⲱⲡⲉ ⲛ̅ⲡⲣⲟⲃ̣[ⲟⲗⲏ] <text:line-break/><text:span text:style-name="T1"> </text:span><text:span text:style-name="T2">(2/29) </text:span> [ⲙ̅ⲡⲓⲭⲛ]ⲟⲥ ⲕⲁⲓ ⲅⲁⲣ ⲥⲉϫⲟⲩ ⲙ̅[ⲙⲁϥ ⲉⲧ]‐ <text:line-break/><text:span text:style-name="T1"> </text:span><text:span text:style-name="T2">(2/30) </text:span> [ⲃⲉ ⲟⲩⲉ]ⲓ̣ⲛⲉ ϫⲉ ⲥⲉⲉⲙⲁϩⲧⲉ ⲙ̣̅[ⲙⲁϥ ϩⲓⲧⲛ̅] <text:line-break/><text:span text:style-name="T1"> </text:span><text:span text:style-name="T2">(2/31) </text:span> [ⲡⲉϥⲓⲭ]ⲛⲟⲥ ϯⲥⲩⲥⲧⲁⲥⲓⲥ ⲉⲙ̣ⲁ̣[ϩⲧⲉ ϩⲓ]‐ <text:line-break/><text:span text:style-name="T1"> </text:span><text:span text:style-name="T2">(2/32) </text:span> [ⲧ̅ⲛ̅ ⲡⲓ]ⲉ̣ⲓⲛⲉ ⲁⲗⲗⲁ ⲡⲛⲟⲩⲧⲉ ⲉ̣[ⲙⲁϩⲧⲉ] <text:line-break/><text:span text:style-name="T1"> </text:span><text:span text:style-name="T2">(2/33) </text:span> [ϩⲓⲧ̅ⲛ̅ ⲛ]ⲉϥⲙⲉⲗⲟⲥ ⟦ⲙ̅ⲙⲓⲛ ⲙ̅ⲙ⟧[ⲁϥⲙ̅ⲙⲉ ⲁ]‐ <text:line-break/><text:span text:style-name="T1"> </text:span><text:span text:style-name="T2">(2/34) </text:span> [ⲣⲁⲩ ϩ]ⲁ̣ⲑⲏ ⲉⲙⲡⲁⲧⲟⲩϫⲡⲁ̣ⲩ̣ [ⲁⲩⲱ ⲥⲉ]‐ <text:line-break/><text:span text:style-name="T1"> </text:span><text:span text:style-name="T2">(2/35) </text:span> [ⲛⲁⲙ̅ⲙ]ⲉ̣ ⲁⲣⲁϥ ⲁⲩⲱ ⲡⲉⲛⲧⲁ̣ϩ̣[ϫⲡⲟ ⲙ̅]‐ <text:line-break/><text:span text:style-name="T1"> </text:span><text:span text:style-name="T2">(2/36) </text:span> [ⲡⲟⲩⲉⲉⲓ] ⲡ̣ⲟⲩⲉⲉⲓ ϫⲓⲛ ⲛ̅ϣ̣[ⲁⲣ̅ⲡ̅ ϥⲛⲁ]‐ <text:line-break/><text:span text:style-name="T1"> </text:span><text:span text:style-name="T2">(2/37) </text:span> [ϩⲙⲁⲥ ⲛ̅ϩⲏ]ⲧ̣ⲟⲩ ϥⲛⲁⲁ̣ⲣ̣[ⲭⲉⲓ ⲁⲣⲁⲩ ⲟⲩ]‐ <text:line-break/><text:span text:style-name="T1"> </text:span><text:span text:style-name="T2">(2/38) </text:span> [ⲁⲛⲁⲅⲕⲁⲓⲟ]ⲥ ⲅⲁⲣ ⲡⲉ ⲁⲧ̣[ⲣⲉⲡⲟⲩⲉⲉⲓ] <text:line-break/><text:span text:style-name="T1"> </text:span><text:span text:style-name="T2">(3/25) </text:span> (Lines 1--25 lacking) <text:line-break/><text:span text:style-name="T1"> </text:span><text:span text:style-name="T2">(3/26) </text:span> [...ⲁⲡ]ⲥ̣ⲱⲧⲏⲣ ⲥⲉϩ̣[ⲱϥ ⲙ̅]ⲙⲉⲩ ⲉⲥⲧⲁ̣ⲙ̣‐ <text:line-break/><text:span text:style-name="T1"> </text:span><text:span text:style-name="T2">(3/27) </text:span> [ⲉ ⲟⲩⲁⲧ]ⲥ̣ⲁⲩⲛⲉ ⲙⲉⲛ̣ [ⲉⲛ ⲡⲉ] ⲁ̣ⲗ̣ⲗ̣ⲁ ⲥⲁⲣⲕ̣[ⲓ]‐ <text:line-break/><text:span text:style-name="T1"> </text:span><text:span text:style-name="T2">(3/28) </text:span> [ⲕⲟⲥ ⲡⲉ ⲡ]ⲗ̣ⲟⲅⲟⲥ ⲛ̅ⲧⲁ[ϩϣⲱⲡ] ⲛ̅ⲟⲩϩⲉⲉⲓ ⲛ̣̅‐ <text:line-break/><text:span text:style-name="T1"> </text:span><text:span text:style-name="T2">(3/29) </text:span> [ⲧⲁϥ ⲛ̅]ⲇⲉ ⲉⲧϣⲟⲟ[ⲡ ⲛ̅ⲟⲩⲉ]ⲓ̣ⲛⲉ ϩⲱⲥⲧ̣[ⲉ] <text:line-break/><text:span text:style-name="T1"> </text:span><text:span text:style-name="T2">(3/30) </text:span> [ⲡⲏ ⲉⲧ̅ⲙ̅ⲙⲉ]ⲩ ⲁⲛ ϥ̅ϣ̣[ⲟⲟⲡ ⲁ]ⲩⲱ ⲧⲏ ⲛ̅‐ <text:line-break/><text:span text:style-name="T1"> </text:span><text:span text:style-name="T2">(3/31) </text:span> [ⲧⲁⲥⲉⲓⲛⲉ ⲙ̅]ⲙ̣ⲁⲛ ⲁⲃ[ⲁⲗ ⲥ]5̅0̅ⲧ̣̅̅ⲣ̅50ⲉϥⲙ̅ⲙⲉ ⲛ̅‐ <text:line-break/><text:span text:style-name="T1"> </text:span><text:span text:style-name="T2">(3/32) </text:span> [ⲇⲉ ϫⲉ ⲧ]ⲁⲧ̣ⲉ ⲧⲉ ⲡⲉⲉ̣[ⲓ ⲟⲩϣ]ⲡ̣ⲏⲣⲉ ⲛ̅ⲧⲉⲥ <text:line-break/><text:span text:style-name="T1"> </text:span><text:span text:style-name="T2">(3/33) </text:span> [ⲡⲉ ϫⲉ] ⲥ̣̅ⲧ̣ⲣ̅ⲛ̅ⲣ̅ ⲧⲡ̣ⲉ̣ [ⲛ̅ⲧϩⲩ]ⲡⲟⲙ̣[ⲟⲛ]ⲏ <text:line-break/><text:span text:style-name="T1"> </text:span><text:span text:style-name="T2">(3/34) </text:span> [ⲁⲗⲗⲁ] ⲡ̣ϣ̣ⲡ̣ⲏ̣[ⲣⲉ ⲡⲉ ⲡⲉⲉⲓ] ϥ̅ⲙⲁ̣[ⲉⲓ]ⲉ̣ ⲙ̅‐ <text:line-break/><text:span text:style-name="T1"> </text:span><text:span text:style-name="T2">(3/35) </text:span> [ⲡⲉⲧⲁϩ]ϣ̣̅̅ⲣ̣̅̅ⲡ̣̅̅ ⲛ̅ϯⲙ̣[ⲁ ⲛ̅ⲟ]ⲩ̣ⲡ̣ⲁⲣⲑⲉⲛⲟⲥ̣ <text:line-break/><text:span text:style-name="T1"> </text:span><text:span text:style-name="T2">(3/36) </text:span> [.....]ⲉ ⲥ̣ϣⲉ ⲁⲣ̅ϣ̣[...]ⲛ̣[..]ⲙ̣ ⲡⲉⲥⲥⲁ[ⲣⲝ] <text:line-break/><text:span text:style-name="T1"> </text:span><text:span text:style-name="T2">(3/37) </text:span> [ 7+- ]ⲡⲁ̣..[....] ⲁϩⲣⲏⲓ̈ ⲁⲡⲙⲟⲩ <text:line-break/><text:span text:style-name="T1"> </text:span><text:span text:style-name="T2">(3/38) </text:span> [ 12+- ⲟⲩⲱ]ϣ[ⲉ] ⲁⲣ̅ⲁⲥⲕⲉⲓ <text:line-break/><text:span text:style-name="T1"> </text:span><text:span text:style-name="T2">(4/23) </text:span> (Lines 1--23 lacking) <text:line-break/><text:span text:style-name="T1"> </text:span><text:span text:style-name="T2">(4/24) </text:span> [..]ⲙⲙ[ ⲉ]‐ <text:line-break/><text:span text:style-name="T1"> </text:span><text:span text:style-name="T2">(4/25) </text:span> ⲧ̣ⲃⲉ ⲡⲉⲉⲓ [ⲁⲥⲕⲁ ⲙ]ⲁ̣ ⲁⲣⲁϥ ⲛ̣̅[ⲧⲉⲥϩⲓ]‐ <text:line-break/><text:span text:style-name="T1"> </text:span><text:span text:style-name="T2">(4/26) </text:span> ⲏ̣ ⲁϥ̅ⲣ̅ϣ̣̅[ⲣⲡ̅ ⲛ̅ⲧⲉ]ⲥ ⲡ̅ⲛ̅ⲃⲉⲗ̣ [ⲁⲧⲉⲉⲓ] <text:line-break/><text:span text:style-name="T1"> </text:span><text:span text:style-name="T2">(4/27) </text:span> ⲡⲁⲣⲑⲉⲛ[ⲟⲥ ⲉⲧⲧ]ⲱⲥ ⲁⲡⲓⲥⲧ̣[ⲁⲩⲣⲟⲥ] <text:line-break/><text:span text:style-name="T1"> </text:span><text:span text:style-name="T2">(4/28) </text:span> ⲉ̣ⲧ̅ⲛ̅ⲛⲓⲙ[ⲁ ⲁⲩⲱ ⟦ⲁⲩ]ⲱ⟧ ⲧⲛ̅ⲛⲉⲩ ⲁ̣[ⲃⲁⲗ ϫⲉ] <text:line-break/><text:span text:style-name="T1"> </text:span><text:span text:style-name="T2">(4/29) </text:span> ⲡⲉⲥⲙⲁⲩ [ⲡⲉⲛⲧ]ⲁ̣ⲧⲁⲩⲑⲉ[ⲛⲧⲓⲁ ⲧⲉⲉⲓϥ̅] <text:line-break/><text:span text:style-name="T1"> </text:span><text:span text:style-name="T2">(4/30) </text:span> ⲙ̅ⲡⲉⲧⲉ ⲟⲩ[ⲛ̅ ⲟⲩⲙ]ⲁⲉⲓⲛ̅ ⲛ̅[ϩⲏⲧ̅ϥ̅ ⲡⲉⲉⲓ] <text:line-break/><text:span text:style-name="T1"> </text:span><text:span text:style-name="T2">(4/31) </text:span> 〈ⲡ〉ⲉ 〈ⲡ〉ⲙⲁⲟⲩ 〈ⲡ〉[ⲉⲧ̅ⲙ̅ⲙ]ⲉⲩ ⲛ̅ⲧⲙ̅ⲛ̣ⲧ̣̅[ⲁⲧⲙⲟⲩ ⲉⲧⲉ] <text:line-break/><text:span text:style-name="T1"> </text:span><text:span text:style-name="T2">(4/32) </text:span> ⲛⲓ̣ⲛⲁ̣ϭ ⲛ̅[ϭⲁⲙ] ⲛ̣ⲁ̣ⲧ̣ⲉⲉⲓϥ̅ ⲛ[ⲉϥ ⲉϥⲙ̅ⲡ]‐ <text:line-break/><text:span text:style-name="T1"> </text:span><text:span text:style-name="T2">(4/33) </text:span> ⲥ̣ⲁ̣[ⲙ̅]ⲡ̣ⲓⲧⲛ̅ [ⲉϥϩ̅ⲙ̅ ⲡⲉⲓ]ⲛⲉ̣ ⲙ̅ⲡ[ⲉⲥϣⲏ] <text:line-break/><text:span text:style-name="T1"> </text:span><text:span text:style-name="T2">(4/34) </text:span> ⲣⲉ ϣⲏⲙ ⲙ̅[ⲡ̅ⲥ̅ⲗⲟ] ⲉ̣ⲧⲃⲏⲧ̣ϥ̣̅ ⲁ̣ⲥ̣[ <text:line-break/><text:span text:style-name="T1"> </text:span><text:span text:style-name="T2">(4/35) </text:span> ⲙ̅ⲡϫ[.....] ⲁ̣ϥ̣ϣⲱⲡⲉ ⲛ̅[ <text:line-break/><text:span text:style-name="T1"> </text:span><text:span text:style-name="T2">(4/36) </text:span> ϩ̅ⲙ̅ ⲡ[..]..[..]ⲗ̣ⲟⲅⲟⲥ ⲉϥ̣[ⲟⲩⲱⲛ̅ϩ̅] <text:line-break/><text:span text:style-name="T1"> </text:span><text:span text:style-name="T2">(4/37) </text:span> ⲁⲃⲁⲗ ⲛ̅ⲡ̣ⲁⲓ̣[ ⲙ̅] <text:line-break/><text:span text:style-name="T1"> </text:span><text:span text:style-name="T2">(4/38) </text:span> ⲡ̅ϥ̅ϯⲥ.ⲁ̣.[ <text:line-break/><text:span text:style-name="T1"> </text:span><text:span text:style-name="T2">(5/13) </text:span> (Lines 1--13 lacking) <text:line-break/><text:span text:style-name="T1"> </text:span><text:span text:style-name="T2">(5/14) </text:span> [ 9+- ]ϩ̣ⲛ[ <text:line-break/><text:span text:style-name="T1"> </text:span><text:span text:style-name="T2">(5/15) </text:span> ϩ̣ⲓ̣ⲧ̣[ⲛ̅..].[.]ⲥⲁϣ̣[ <text:line-break/><text:span text:style-name="T1"> </text:span><text:span text:style-name="T2">(5/16) </text:span> ⲓ̈ ⲁⲃⲁⲗ̣ ϩ̅ⲛ̅ ⲛⲓⲙⲁ̣ [ϩⲁⲉⲓⲛⲉ ⲁⲩϩⲁⲉⲓⲉ] <text:line-break/><text:span text:style-name="T1"> </text:span><text:span text:style-name="T2">(5/17) </text:span> ϩ̅ⲛ̅ ⲧⲉϩⲓⲏ ϩ̅ⲛ̅ⲕⲁⲩ̣ⲉ̣ [ⲁⲩϩⲁⲉⲓⲉ ϩ̅ⲛ̅ ⲛ̅ⲱⲛⲉ] <text:line-break/><text:span text:style-name="T1"> </text:span><text:span text:style-name="T2">(5/18) </text:span> ϩ̅ⲛ̅ⲕⲉⲕⲁⲩⲉ ⲇ̣ⲉ ⲁϥϫ̣[ⲁⲩ ϩ̅ⲛ̅ ⲛ̅ϣⲁⲛⲧⲉ ϩ̅ⲛ̅] <text:line-break/><text:soft-page-break/><text:span text:style-name="T1"> </text:span><text:span text:style-name="T2">(5/19) </text:span> ⲕⲁ̣ⲩⲉ̣ ⲇⲉ ⲁⲛ̣ [ⲁϥϯ]ⲥⲟ[ⲩ ⲁⲣⲁⲩ <text:line-break/><text:span text:style-name="T1"> </text:span><text:span text:style-name="T2">(5/20) </text:span> ⲙⲉ̣ⲛ̣ ⲛ̅ⲛ.[..].ⲟⲩⲣ[ <text:line-break/><text:span text:style-name="T1"> </text:span><text:span text:style-name="T2">(5/21) </text:span> ⲙ̅ⲛ̅ ⲑⲁⲉⲓⲃⲉ̣[ⲥ] ⲉ̣ⲓⲥ ϩ[ⲏⲧⲉ <text:line-break/><text:span text:style-name="T1"> </text:span><text:span text:style-name="T2">(5/22) </text:span> [..]ⲥ̣ ⲛ̅ⲧⲁϥ̣[ <text:line-break/><text:span text:style-name="T1"> </text:span><text:span text:style-name="T2">(5/23) </text:span> [..].ⲉⲛⲁ[ <text:line-break/><text:span text:style-name="T1"> </text:span><text:span text:style-name="T2">(5/24) </text:span> [.....].̅[ 14+- ].ⲁⲉⲧ̣.[ <text:line-break/><text:span text:style-name="T1"> </text:span><text:span text:style-name="T2">(5/25) </text:span> [ 6+- ].ⲧⲉⲉⲓ ⲛ̅[ⲇ]ⲉ̣ [ⲧⲉ ⲧⲟ]ⲩⲥ̣ⲓⲁ ⲛ̅ϣ[ⲁ ⲁ]‐ <text:line-break/><text:span text:style-name="T1"> </text:span><text:span text:style-name="T2">(5/26) </text:span> [ⲛⲏϩⲉ ⲉ]ⲙⲡⲁⲧⲉ ⲛ̅ⲯ⟦ⲯ̣⟧[ⲩⲭ]ⲁ̣ⲩ̣[ⲉ]ⲓ̣ⲉ ⲉⲓ ⲁⲃⲁⲗ ϩ[ⲛ̅] <text:line-break/><text:span text:style-name="T1"> </text:span><text:span text:style-name="T2">(5/27) </text:span> [ⲛⲉⲉⲓ ⲉⲧ]ⲟ̣ⲩ̣ⲙ̣ⲟⲩⲟⲩⲧ ⲙ̣̅[ⲙ]ⲁⲩ ⲁⲗⲗⲁ ⲛⲉϥ‐ <text:line-break/><text:span text:style-name="T1"> </text:span><text:span text:style-name="T2">(5/28) </text:span> ϣ̣ⲟⲟ̣ⲡ ⲉⲩⲣ̅ⲇⲓⲱⲕⲉ [ⲛ̅⟦ⲥ]ⲁ̣ⲛ⟧ⲥⲱϥ ϩ̅ⲙ̅ ⲡⲙ̣[ⲁ] <text:line-break/><text:span text:style-name="T1"> </text:span><text:span text:style-name="T2">(5/29) </text:span> [ⲉ]ⲧ̣̅̅ⲙ̅ⲙⲉⲩ ϩ̅ⲛ̅ ⲡⲓⲭⲛ̣[ⲟⲥ ⲉ]ⲛⲧⲁⲩϫⲡⲁϥ ϩⲓ‐ <text:line-break/><text:span text:style-name="T1"> </text:span><text:span text:style-name="T2">(5/30) </text:span> [ⲧ̅]̅ⲛ̅ ⲡⲥⲱⲧⲏⲣ ⲁⲩⲣ̅ⲥ̣[ⲧⲁⲩ]ⲣⲟⲩ ⲇⲉ ⲙ̅ⲙⲁϥ <text:line-break/><text:span text:style-name="T1"> </text:span><text:span text:style-name="T2">(5/31) </text:span> [ⲁ]ⲩ̣ⲱ ⲁϥⲙⲟⲩ ⲙ̅ⲡⲉϥ̣[ⲙⲟ]ⲩ ⲉⲛ ⲙ̅ⲙⲓⲛ ⲙ̅‐ <text:line-break/><text:span text:style-name="T1"> </text:span><text:span text:style-name="T2">(5/32) </text:span> [ⲙⲁϥ] ⲛⲉϥ̅ⲙ̅ⲡϣⲁ̣ ⲅ̣[ⲁⲣ ⲉ]ⲛ̣ ⲙ̅ⲙⲟⲩ [ⲣⲱ] ⲉ‐ <text:line-break/><text:span text:style-name="T1"> </text:span><text:span text:style-name="T2">(5/33) </text:span> [ⲧⲃⲉ] ⲧ̣ⲉⲕⲕⲗⲏⲥⲓⲁ ⲛ̣̅[ⲛ̅ⲣⲉ]ϥ̣ⲙⲟⲩ ⲁ[ⲩⲱ]ϥ̅ⲧ̅ <text:line-break/><text:span text:style-name="T1"> </text:span><text:span text:style-name="T2">(5/34) </text:span> [ⲇⲉ] ⲙ̣̅ⲙⲁ̣ϥ̣ ϫⲉⲕⲁⲥⲉ [ⲉⲩ]ⲛ̣ⲁⲉⲙⲁϩⲧⲉ ⲙ̅‐ <text:line-break/><text:span text:style-name="T1"> </text:span><text:span text:style-name="T2">(5/35) </text:span> [ⲙⲁ]ϥ ϩ̣[ⲛ̅] ⲧ̣ⲉⲕⲕⲗⲏⲥⲓⲁ [ⲛ̅ⲧⲁ]ϥ̣[ⲣ̅ⲟⲩ]ⲱ̣ ⲛⲉⲥ‐ <text:line-break/><text:span text:style-name="T1"> </text:span><text:span text:style-name="T2">(5/36) </text:span> [ϩⲓ]ⲧ̣̅̅ⲛ̅ ϩ̅ⲛ̅ϣⲱⲥ ⲉⲁϥ[ⲓ ⲛ̅ϯ]ⲙⲓ̣ⲛⲉ ⲁ̣ⲡ̣ϩⲓ‐ <text:line-break/><text:span text:style-name="T1"> </text:span><text:span text:style-name="T2">(5/37) </text:span> ⲥⲉ̣ ⲡⲉⲉⲓ ⲛ̅ⲧⲁϥϣ[ⲱⲡ ϩⲓ]ⲥ̣ⲉ ⲙ̅ⲙⲁϥ ⲉϥ‐ <text:line-break/><text:span text:style-name="T1"> </text:span><text:span text:style-name="T2">(5/38) </text:span> ϣⲟⲟⲡ ⲅⲁⲣ ⲛⲉⲛ̣ ⲛ̣̅ⲉⲓ[ⲛⲉ] ⲛ̅ϭⲓ ⲓ̣ⲏ̅ⲥ̅ ⲉⲧⲃⲉ <text:line-break/><text:span text:style-name="T1"> </text:span><text:span text:style-name="T2">(6/13) </text:span> (Lines 1--13 lacking) <text:line-break/><text:span text:style-name="T1"> </text:span><text:span text:style-name="T2">(6/14) </text:span> [ 11+- ]ⲁ.[ <text:line-break/><text:span text:style-name="T1"> </text:span><text:span text:style-name="T2">(6/15) </text:span> [ 13+- ]ⲡⲉⲉⲓ̣ϣ[..]ⲙ <text:line-break/><text:span text:style-name="T1"> </text:span><text:span text:style-name="T2">(6/16) </text:span> [ 9+- ϯⲥⲩⲥⲧⲁ]ⲥ̣ⲓⲥ ⲧⲏⲣ̅ⲥ̅ ⲁⲩⲱ <text:line-break/><text:span text:style-name="T1"> </text:span><text:span text:style-name="T2">(6/17) </text:span> [ 9+- ⲡⲛ]ⲁ̣[ϭ] ⲛ̅ⲥⲓϣⲉ ⲙ̅ⲡⲕⲟ <text:line-break/><text:span text:style-name="T1"> </text:span><text:span text:style-name="T2">(6/18) </text:span> [ⲥⲙⲟⲥ 8+- ]ⲟ̣ⲧ ⲙ̣̅ⲙ̣ⲁ̣ⲛ ⲙ̅ⲛ̅ ⲛ̅ <text:line-break/><text:span text:style-name="T1"> </text:span><text:span text:style-name="T2">(6/19) </text:span> [ 11+- ϩ]ⲓ̣ⲧ̅ⲛ̣̅̅ [ϩ̅ⲛ̅]ⲗⲏⲥⲧ̣ⲏ̣ⲥ <text:line-break/><text:span text:style-name="T1"> </text:span><text:span text:style-name="T2">(6/20) </text:span> [ 12+- ]ⲛ̅ⲇ̣[ⲟⲩ]ⲗ̣ⲟⲥ ⲁ..ⲙ <text:line-break/><text:span text:style-name="T1"> </text:span><text:span text:style-name="T2">(6/21) </text:span> [ 10+- ⲁⲡ]ⲓ5̅0̅ⲧ̣̅̅[̅ⲛ̅]̅50 ⲁ̣ϫⲓⲉⲣⲓⲭⲱ <text:line-break/><text:span text:style-name="T1"> </text:span><text:span text:style-name="T2">(6/22) </text:span> [ 15+- ].[.]ⲁⲩϫ̣ⲓ̣ <text:line-break/><text:span text:style-name="T1"> </text:span><text:span text:style-name="T2">(6/23) </text:span> [ 16+- ].ⲛⲁⲙ̣[ <text:line-break/><text:span text:style-name="T1"> </text:span><text:span text:style-name="T2">(6/24) </text:span> [ⲛ̅]ⲅ̣ⲁⲣ ⲉⲩ̣[ ⲁ] <text:line-break/><text:span text:style-name="T1"> </text:span><text:span text:style-name="T2">(6/25) </text:span> [ⲡ]ⲓ̣ⲧ̅ⲛ̅ ϣⲁ̣ [ⲛⲉⲧⲛ]ⲁ̣ϭ̣ⲱϣⲧ̣ [ⲁⲃⲁⲗ] <text:line-break/><text:span text:style-name="T1"> </text:span><text:span text:style-name="T2">(6/26) </text:span> ⲉ̣ⲣⲉⲡϣⲧ̣ⲁ ⲧ̣ⲏ̣ⲣ̣[ϥ̅ ⲉ]ⲙⲁϩⲧⲉ ⲙ̣̅ⲙ̣[ⲁⲩ] <text:line-break/><text:span text:style-name="T1"> </text:span><text:span text:style-name="T2">(6/27) </text:span> ϣⲁ ϯⲟⲩⲥⲓⲁ [ⲛ̅ϩ]ⲁⲏ ⲉⲧⲉ ⲧⲉⲉⲓ̣ ⲧ̣[ⲉ] <text:line-break/><text:span text:style-name="T1"> </text:span><text:span text:style-name="T2">(6/28) </text:span> [ⲧ]ⲟⲩϣⲓⲧ̅ⲥ̅ ⲉⲁϥ[ⲛ]ⲧ̣̅ⲛ̅ ⲁⲡⲥⲁⲛ̅ⲡⲓⲧ̅ⲛ̅ <text:line-break/><text:span text:style-name="T1"> </text:span><text:span text:style-name="T2">(6/29) </text:span> ⲉⲁϥⲙⲟⲩⲣ ⲙ̅ⲙ̣[ⲁ]ⲛ̣ ⲛ̅ϩ̅ⲛ̅ⲁⲃⲏ ⲛ̅ⲥⲁⲣ[ⲝ] <text:line-break/><text:span text:style-name="T1"> </text:span><text:span text:style-name="T2">(6/30) </text:span> 1̅6vacat̅16 [ⲉ]ⲣⲉⲡⲥⲱⲙⲁ ⲟⲉⲓ ⲛ̅[ⲟⲩ]‐ <text:line-break/><text:span text:style-name="T1"> </text:span><text:span text:style-name="T2">(6/31) </text:span> ⲡⲁⲛⲇⲟⲕⲉⲓⲟ[ⲛ ⲉ]ⲩ̣ⲛ̅ⲧⲉⲟⲩϥ ⲙ̅ⲙⲉⲩ ⲛ̣̅[ⲟⲩ]‐ <text:line-break/><text:span text:style-name="T1"> </text:span><text:span text:style-name="T2">(6/32) </text:span> ⲙ̣[ⲁ] ⲛ̣̅ϣⲱⲡ[ⲉ ⲛ̅]ϭ̣[ⲓ] ⲛⲁⲣⲭⲏ ⲙ̅ⲛ̣̅̅ [ⲛⲉ]‐ <text:line-break/><text:span text:style-name="T1"> </text:span><text:span text:style-name="T2">(6/33) </text:span> ⲝ[ⲟⲩⲥⲓ]ⲁ ⲡⲣⲱ̣[ⲙⲉ ⲉ]ⲧ̣ϩⲓϩⲟⲩⲛ̣ ⲛ̅ⲧ̣[ⲁⲣⲟⲩ] <text:line-break/><text:span text:style-name="T1"> </text:span><text:span text:style-name="T2">(6/34) </text:span> ⲁⲧⲡ̣ϥ̣̅ ⲁϩⲟⲩⲛ [ⲁ]ⲧ̣ⲡⲗⲁⲥⲓⲥ ⲁ̣[ϥ]ϣ[ⲱⲡⲉ] <text:line-break/><text:span text:style-name="T1"> </text:span><text:span text:style-name="T2">(6/35) </text:span> ϩ̅ⲛ̅ ϩⲓ̣[ⲥⲉ ⲁⲩⲱ ⲉ]ⲁ̣ⲩⲣ̅ⲁⲛⲁⲅⲕ̣ⲁ̣[ⲍⲉ] ⲙ̅ⲙ̣[ⲁϥ] <text:line-break/><text:span text:style-name="T1"> </text:span><text:span text:style-name="T2">(6/36) </text:span> ⲁⲣ̅ϩ̣̅̅ⲙ̅[ϩⲉ]ⲗ̣ ⲛ̣[ⲉⲩ ⲁ]ⲩⲱϭ̅ⲧ̅ ⲙ̅ⲙⲁϥ ⲁⲣ̅ϩ̣[ⲩ] <text:line-break/><text:span text:style-name="T1"> </text:span><text:span text:style-name="T2">(6/37) </text:span> ⲡⲟⲩⲣⲕⲉⲓ ⲛ̅[ⲛⲓⲉ]ⲛ̣ⲉⲣⲅⲉⲓⲁ ⲁⲩⲡⲱ‐ <text:line-break/><text:span text:style-name="T1"> </text:span><text:span text:style-name="T2">(6/38) </text:span> ϣⲉ ⲛ̅ⲧⲉⲕ̣ⲕⲗⲏⲥ̣[ⲓ]ⲁ̣ ⲁ̣ⲧ̣ⲣ̣ⲟⲩϫ〈ⲓⲕ〉ⲗⲏⲣⲟⲥ ⲁ‐ <text:line-break/><text:span text:style-name="T1"> </text:span><text:span text:style-name="T2">(7/7) </text:span> (Lines 1--7 lacking) <text:line-break/><text:soft-page-break/><text:span text:style-name="T1"> </text:span><text:span text:style-name="T2">(7/8) </text:span> [....]ⲙ̣ⲉ̣[ <text:line-break/><text:span text:style-name="T1"> </text:span><text:span text:style-name="T2">(7/9) </text:span> [...].ⲉ̣ⲉⲓ.[ <text:line-break/><text:span text:style-name="T1"> </text:span><text:span text:style-name="T2">(7/10) </text:span> ϭⲁⲙ ⲁϣ.[ <text:line-break/><text:span text:style-name="T1"> </text:span><text:span text:style-name="T2">(7/11) </text:span> ⲣⲟⲩⲥⲑⲁⲓ· ⲇ̣[ⲉ <text:line-break/><text:span text:style-name="T1"> </text:span><text:span text:style-name="T2">(7/12) </text:span> [ⲣ]ⲟ̣ⲩⲥⲑⲁⲓ ⲇⲉ[ <text:line-break/><text:span text:style-name="T1"> </text:span><text:span text:style-name="T2">(7/13) </text:span> ⲉⲁϥϭⲙ̣[ϭⲱⲙ%1 <text:line-break/><text:span text:style-name="T1"> </text:span><text:span text:style-name="T2">(7/14) </text:span> ϩ̣ⲁ5̅0̅ϫ̣̅̅[̅ⲛ̅50 <text:line-break/><text:span text:style-name="T1"> </text:span><text:span text:style-name="T2">(7/15) </text:span> [ 8+- ]..[ <text:line-break/><text:span text:style-name="T1"> </text:span><text:span text:style-name="T2">(7/16) </text:span> ⲡ[.....]ⲧ̣ⲁϩⲉ̣[ ⲡ]‐ <text:line-break/><text:span text:style-name="T1"> </text:span><text:span text:style-name="T2">(7/17) </text:span> ⲥⲁⲉⲓ̣ⲉ ⲡⲉ ⲉⲧⲛ̣[ⲁ <text:line-break/><text:span text:style-name="T1"> </text:span><text:span text:style-name="T2">(7/18) </text:span> ⲣⲟⲩ ⲁⲩⲱϣⲉ ⲁ̣[ ⲁⲩ]‐ <text:line-break/><text:span text:style-name="T1"> </text:span><text:span text:style-name="T2">(7/19) </text:span> ⲱ ⲁϣⲱⲡⲉ ⲛ̅ⲙ̣̅̅[ⲙⲉ%1 <text:line-break/><text:span text:style-name="T1"> </text:span><text:span text:style-name="T2">(7/20) </text:span> ⲉⲩⲙⲓϣⲉ̣ 5̅0̅[̅ⲙ̅]̅ⲛ̅50 ⲛ̣[ⲉⲩⲉⲣⲏⲩ <text:line-break/><text:span text:style-name="T1"> </text:span><text:span text:style-name="T2">(7/21) </text:span> ⲛ̅ⲑⲉ ⲛ̅5̅0̅ϩ̅[̅ⲛ̅50]ⲕ̣ⲁ̣ⲩⲉ̣[ <text:line-break/><text:span text:style-name="T1"> </text:span><text:span text:style-name="T2">(7/22) </text:span> ⲡⲁⲣⲑⲉⲛⲟ̣[ⲥ <text:line-break/><text:span text:style-name="T1"> </text:span><text:span text:style-name="T2">(7/23) </text:span> ⲁⲧⲉⲕⲟ ⲛ̅[ <text:line-break/><text:span text:style-name="T1"> </text:span><text:span text:style-name="T2">(7/24) </text:span> ϣⲱϭ[ⲉ <text:line-break/><text:span text:style-name="T1"> </text:span><text:span text:style-name="T2">(7/25) </text:span> ⲧⲉ..̅.̅[...].[ <text:line-break/><text:span text:style-name="T1"> </text:span><text:span text:style-name="T2">(7/26) </text:span> ⲕⲁ̣ⲥ ⲁⲗⲗⲁ ⲁⲥⲙ[ ⲉⲥⲧⲁⲛ]‐ <text:line-break/><text:span text:style-name="T1"> </text:span><text:span text:style-name="T2">(7/27) </text:span> ⲧ̅ⲛ̅ ⲙ̅ⲙⲁⲥ ⲁⲧⲉ.[ <text:line-break/><text:span text:style-name="T1"> </text:span><text:span text:style-name="T2">(7/28) </text:span> ⲁⲣⲁⲥ ⲉⲁⲩⲥⲁϣ[ <text:line-break/><text:span text:style-name="T1"> </text:span><text:span text:style-name="T2">(7/29) </text:span> [ⲁ]ⲧ̣ⲧⲉⲕⲟ ⲡⲉⲉⲓ[ <text:line-break/><text:span text:style-name="T1"> </text:span><text:span text:style-name="T2">(7/30) </text:span> ⲁⲧⲣⲉϥϭⲱ ⲛ̅ⲇ̣[ <text:line-break/><text:span text:style-name="T1"> </text:span><text:span text:style-name="T2">(7/31) </text:span> ⲡ̣ⲁⲣⲑⲉⲛⲟⲥ ⲡ[ <text:line-break/><text:span text:style-name="T1"> </text:span><text:span text:style-name="T2">(7/32) </text:span> [ⲧ]ⲉⲥⲙ̅ⲛ̅ⲧ̅ⲥⲁⲉⲓⲉ[ <text:line-break/><text:span text:style-name="T1"> </text:span><text:span text:style-name="T2">(7/33) </text:span> 5̅0̅ⲙ̅[̅ⲛ̅]̅ⲧ̅50ⲧⲡⲓⲥⲧⲟⲥ ⲙ̅[ <text:line-break/><text:span text:style-name="T1"> </text:span><text:span text:style-name="T2">(7/34) </text:span> ⲁ[ⲩ]ⲱ̣ ⲉⲧⲃⲉ ⲡⲉⲉ[ⲓ ⲙ̅]‐ <text:line-break/><text:span text:style-name="T1"> </text:span><text:span text:style-name="T2">(7/35) </text:span> ⲙ[ⲁ]ⲥ ⲁ̣ϥ̣ϭⲉⲡⲏ [ <text:line-break/><text:span text:style-name="T1"> </text:span><text:span text:style-name="T2">(7/36) </text:span> ⲙ̅ⲡϥ̅ⲣ̅ⲁⲛⲉⲭⲉ ⲛ̣[ <text:line-break/><text:span text:style-name="T1"> </text:span><text:span text:style-name="T2">(7/37) </text:span> ⲉⲓⲉ ⲉⲩϣⲱⲥ ⲙ̅ⲙ̣̅̅[ⲁ%1 <text:line-break/><text:span text:style-name="T1"> </text:span><text:span text:style-name="T2">(7/38) </text:span> ⲧⲙⲉⲉⲩ ⲅⲁⲣ ⲛ̅ⲧⲁ̣ⲣ̣[ⲉⲥ <text:line-break/><text:span text:style-name="T1"> </text:span><text:span text:style-name="T2">(8/5) </text:span> (Lines 1--5 lacking) <text:line-break/><text:span text:style-name="T1"> </text:span><text:span text:style-name="T2">(8/6) </text:span> [ 15+- ].[ <text:line-break/><text:span text:style-name="T1"> </text:span><text:span text:style-name="T2">(8/7) </text:span> [ 13+- ⲧⲙ]ⲉⲉⲩ .[ <text:line-break/><text:span text:style-name="T1"> </text:span><text:span text:style-name="T2">(8/8) </text:span> [ 15+- ]ϥ̣̅ ϣⲁ[.]ϩ̣ⲓ̣ⲧ̣ <text:line-break/><text:span text:style-name="T1"> </text:span><text:span text:style-name="T2">(8/9) </text:span> [ 15+- ]ⲡ̣̅̅ⲥ̅ⲉⲡⲓⲃⲟⲩ‐ <text:line-break/><text:span text:style-name="T1"> </text:span><text:span text:style-name="T2">(8/10) </text:span> [ⲗⲟⲥ 11+- ⲧ]ⲉⲥⲃⲱ ⲛ̅ϫⲉ̣. <text:line-break/><text:span text:style-name="T1"> </text:span><text:span text:style-name="T2">(8/11) </text:span> [ 16+- ].[.].ⲉ̣ⲡⲧⲟⲩ. <text:line-break/><text:span text:style-name="T1"> </text:span><text:span text:style-name="T2">(8/12) </text:span> [ 16+- 5̅0̅ⲛ̅50]ⲧⲃⲓⲁ ⲉ[ <text:line-break/><text:span text:style-name="T1"> </text:span><text:span text:style-name="T2">(8/13) </text:span> [ 18+- ]ⲁ̣ϩⲉ[ <text:line-break/><text:span text:style-name="T1"> </text:span><text:span text:style-name="T2">(8/14) </text:span> [ 12+- ]ⲛ̣.[ 8+- ].[ <text:line-break/><text:span text:style-name="T1"> </text:span><text:span text:style-name="T2">(8/15) </text:span> [ 11+- ]ⲫⲩⲥⲓ[ⲥ].[....]ⲁϩ <text:line-break/><text:span text:style-name="T1"> </text:span><text:span text:style-name="T2">(8/16) </text:span> [ 10+- ⲑⲉ]ⲱ̣ⲣⲉⲓ ⲛ̅ϫⲉⲣⲉ ϣⲏⲙ̣ <text:line-break/><text:span text:style-name="T1"> </text:span><text:span text:style-name="T2">(8/17) </text:span> [ 11+- ]ⲙ̣̅̅ⲛ̅ϭⲁⲙ ⲙ̅ⲙⲁϥ <text:line-break/><text:span text:style-name="T1"> </text:span><text:span text:style-name="T2">(8/18) </text:span> [ 12+- ]ⲛ̅ⲇⲉ ϣⲁⲣⲡ ⲙ̅ⲙⲉⲛ <text:line-break/><text:span text:style-name="T1"> </text:span><text:span text:style-name="T2">(8/19) </text:span> [ 12+- ⲡ]ⲉⲛ[ⲁ]ⲛ̣ⲧⲓⲟⲛ ⲛ̅ <text:line-break/><text:span text:style-name="T1"> </text:span><text:span text:style-name="T2">(8/20) </text:span> [ 9+- ⲛ̅ⲉϣ] ⲛ̅ϩⲉ̣ [ⲛ̅]ⲇⲉ ⲛ̅ⲧⲁϥ <text:line-break/><text:soft-page-break/><text:span text:style-name="T1"> </text:span><text:span text:style-name="T2">(8/21) </text:span> [ 12+- ].[..]ϫ̣[ⲉ]ⲣⲉ ϣⲏⲙ <text:line-break/><text:span text:style-name="T1"> </text:span><text:span text:style-name="T2">(8/22) </text:span> [ 15+- ]ⲙ̣̅ⲡⲉϥϣϭⲛ̅‐ <text:line-break/><text:span text:style-name="T1"> </text:span><text:span text:style-name="T2">(8/23) </text:span> [ϭⲁⲙ 10+- ].[.]ⲱ̣ⲥ ⲁϥ̅ϣⲱ̣‐ <text:line-break/><text:span text:style-name="T1"> </text:span><text:span text:style-name="T2">(8/24) </text:span> [ⲡⲉ 12+- ⲙⲟ]ⲩ̣ⲟⲩⲧ ⲙ̅ⲙⲁϥ̣ <text:line-break/><text:span text:style-name="T1"> </text:span><text:span text:style-name="T2">(8/25) </text:span> [ 11+- ]ⲣ[.].[..].ⲁ̣ⲁ̣ⲛ̅ϩ̅ <text:line-break/><text:span text:style-name="T1"> </text:span><text:span text:style-name="T2">(8/26) </text:span> [ 11+- ]ⲁ̣ϥⲱⲡ ⲛ̅ⲧⲉⲥⲙ̅ⲛ̅ⲧ̣̅̅ <text:line-break/><text:span text:style-name="T1"> </text:span><text:span text:style-name="T2">(8/27) </text:span> [ 9+- ⲥⲁ]ⲧ̣̅̅ⲡ̅ ⲁⲡⲱⲱⲛ̅ϩ̅ <text:line-break/><text:span text:style-name="T1"> </text:span><text:span text:style-name="T2">(8/28) </text:span> [ 11+- ]ⲉϥⲥⲁⲩⲛⲉ ϫⲉ ⲉⲓϣ‐ <text:line-break/><text:span text:style-name="T1"> </text:span><text:span text:style-name="T2">(8/29) </text:span> [ⲡⲉ 8+- ⲕ]ⲟ̣ⲥⲙⲟⲥ ⲥⲁⲁⲛ̣[ⲧ̅ϥ̅] <text:line-break/><text:span text:style-name="T1"> </text:span><text:span text:style-name="T2">(8/30) </text:span> [ 10+- ]ⲙ̣̅ⲙⲁϥ ⲁⲧⲟⲩⲛⲁ[ⲥ]‐ <text:line-break/><text:span text:style-name="T1"> </text:span><text:span text:style-name="T2">(8/31) </text:span> [ⲥϥ 9+- ]ⲃ ⲁϩⲣⲏⲓ̈ ⲁⲃⲁⲗ ϩ̅[̅ⲛ̅] <text:line-break/><text:span text:style-name="T1"> </text:span><text:span text:style-name="T2">(8/32) </text:span> [ 10+- ⲁ]ϫ̅ⲛ̅ ⲛ̅ⲙⲉⲣⲟⲥ ⲛ̣̅[ <text:line-break/><text:span text:style-name="T1"> </text:span><text:span text:style-name="T2">(8/33) </text:span> [ 9+- ⲛⲉ]ⲧ̣ⲟⲩⲉⲙⲁϩⲧⲉ̣ [ⲁ]ϫ̣ⲱ̣‐ <text:line-break/><text:span text:style-name="T1"> </text:span><text:span text:style-name="T2">(8/34) </text:span> [ⲟⲩ 9+- ].ⲡⲁϩⲧϥ̅ ⲛ̅ⲇ̣[ⲉ] ⲁ̣ⲃⲁⲗ̣ <text:line-break/><text:span text:style-name="T1"> </text:span><text:span text:style-name="T2">(8/35) </text:span> [ 11+- ]ϥ̣̅ϣⲟⲟⲡ ⲛ̅ϩⲏ̣ⲧ̣̅̅ϥ̅ <text:line-break/><text:span text:style-name="T1"> </text:span><text:span text:style-name="T2">(8/36) </text:span> [ 11+- ]ⲡⲉⲓⲱⲧ ⲙ̅ⲡⲧⲏⲣ̅ϥ̅ <text:line-break/><text:span text:style-name="T1"> </text:span><text:span text:style-name="T2">(8/37) </text:span> [ 11+- ]ⲣ̣̅ϩⲟⲩⲟ ϣⲁⲣⲁⲥ ⲙ̅ <text:line-break/><text:span text:style-name="T1"> </text:span><text:span text:style-name="T2">(8/38) </text:span> [ 11+- ]..ⲙ̅ⲙⲁϥ̅· ϥ̅ϣⲟ <text:line-break/><text:span text:style-name="T1"> </text:span><text:span text:style-name="T2">(9/8) </text:span> (Lines 1--8 lacking) <text:line-break/><text:span text:style-name="T1"> </text:span><text:span text:style-name="T2">(9/9) </text:span> ⲙⲉ ⲛ̣̅ ⲑⲉ̣[ <text:line-break/><text:span text:style-name="T1"> </text:span><text:span text:style-name="T2">(9/10) </text:span> ⲁ̣ϩⲟⲩⲛ ⲁ.[ ⲟⲩⲛ̅]‐ <text:line-break/><text:span text:style-name="T1"> </text:span><text:span text:style-name="T2">(9/11) </text:span> [ⲧⲉ]ϥⲥⲉ ⲉⲩ.[ 6+- ].[ <text:line-break/><text:span text:style-name="T1"> </text:span><text:span text:style-name="T2">(9/12) </text:span> [.]ⲟ̣ⲩ ⲛ̅ϥ̅[....ⲡⲟⲩⲉ]ⲉⲓ ⲡⲟ̣ⲩ̣[ⲉⲉⲓ ϥⲛⲁ]‐ <text:line-break/><text:span text:style-name="T1"> </text:span><text:span text:style-name="T2">(9/13) </text:span> ⲙ̣̅ⲡϣ̣[ⲁ 8+- ]ϫ̣ⲓⲧ̅ϥ̅ ⲁⲩ̣[ⲱ <text:line-break/><text:span text:style-name="T1"> </text:span><text:span text:style-name="T2">(9/14) </text:span> [ 8+- ].[...].̅ⲧ̣̅̅ ⲁϩ̅ⲛ̅ϣⲏ̣[ <text:line-break/><text:span text:style-name="T1"> </text:span><text:span text:style-name="T2">(9/15) </text:span> .[...].[.ⲡⲥ]ⲁϩ̣ [ⲉ]ϥ̣ϣⲁⲛϩⲁⲡ̅ϥ̅ ϩ̣[ⲱⲥ] <text:line-break/><text:span text:style-name="T1"> </text:span><text:span text:style-name="T2">(9/16) </text:span> ⲟⲩⲛ[ⲟ]ⲩⲧⲉ [ⲡ]ⲉ ⲉ̣[ϥ]ⲁ̣ϭⲗⲁⲗⲗ̅ⲙ̅ ⲁⲛ̣[ⲉϥϩ]‐ <text:line-break/><text:span text:style-name="T1"> </text:span><text:span text:style-name="T2">(9/17) </text:span> ⲃⲏⲩⲉ ⲛ̅ϥ̅ϣ̣̅ⲣ̅ϣⲱ̣ⲣⲟⲩ ⲕⲁⲓ ⲅ̣[ⲁ]ⲣ̣ ⲁ̣[ϥ]‐ <text:line-break/><text:span text:style-name="T1"> </text:span><text:span text:style-name="T2">(9/18) </text:span> ϣⲉϫⲉ ⲙ̅ⲛ̅ ⲧⲉⲕ[ⲕⲗ]ⲏ̣ⲥⲓⲁ ⲁϥⲉ̣[ⲉϥ ⲛ̅ⲇⲉ] <text:line-break/><text:span text:style-name="T1"> </text:span><text:span text:style-name="T2">(9/19) </text:span> ⲛⲉⲥ ⲛ̅ⲥⲁϩ̣ ⲛ̅ⲧ̅ⲙ̅ⲛ̣̅̅[ⲧⲁ]ⲧ̣ⲙ̣ⲟⲩ ⲁ̣[ϥϣⲁⲣ]‐ <text:line-break/><text:span text:style-name="T1"> </text:span><text:span text:style-name="T2">(9/20) </text:span> ϣⲣ̅ ⲛ̅ⲡⲧ̣[ⲟⲗⲙ]ⲏⲣⲟⲥ̣ [ⲛ̅ⲥ]ⲁ̣ϩ ⲉϥ[ϯ ⲥⲃⲱ] <text:line-break/><text:span text:style-name="T1"> </text:span><text:span text:style-name="T2">(9/21) </text:span> ⲛⲉⲥ ⲁⲙ[ⲟ]ⲩ̣ [ⲁⲩ]ⲱ̣ ⲡ̣[ⲉⲉⲓⲥⲁ]ϩ ⲁ[ϥⲣ̅ ⲟⲩ]‐ <text:line-break/><text:span text:style-name="T1"> </text:span><text:span text:style-name="T2">(9/22) </text:span> ⲥⲭⲟⲗⲏ ⲛ̅ⲱ̣[ⲛ̅ϩ̅ ⲡⲓⲥⲁ]ϩ̣ [ⲛ̅ⲅ]ⲁ̣ⲣ ⲉⲩ̣[ⲛ̅ⲧⲉϥ] <text:line-break/><text:span text:style-name="T1"> </text:span><text:span text:style-name="T2">(9/23) </text:span> ⲛ̅ⲕⲉⲥⲭ[ⲟⲗⲏ ⲉⲥϯ ⲥ]ⲃ̣ⲱ ⲙ̣ⲉⲛ ⲛ[ⲉⲛ ⲁ]‐ <text:line-break/><text:span text:style-name="T1"> </text:span><text:span text:style-name="T2">(9/24) </text:span> ⲛ̅ⲥϩⲉⲉⲓ̣ [ⲙ̅ⲙⲟⲩ ⲛⲉ]ϥ̣ ⲧ̣ⲣ̅ⲛ̅ⲥⲉϩ[ⲱⲛ] <text:line-break/><text:span text:style-name="T1"> </text:span><text:span text:style-name="T2">(9/25) </text:span> ⲛ̅ⲇⲉ ⲁⲃⲁⲗ̣ [ϩ]ⲛ̣̅ ⲡ̣[ⲓⲥ]ⲉⲓ ⲛ̅ⲧⲉ ⲡⲕⲟⲥⲙ̣[ⲟⲥ] <text:line-break/><text:span text:style-name="T1"> </text:span><text:span text:style-name="T2">(9/26) </text:span> ⲛⲉⲉⲓ ⲛⲉⲩϯ̣ ⲥⲃ̣ⲱ̣ ⲛⲉⲛ ⲁⲡ̅ⲛ̅ⲙⲟⲩ̣ [ⲁ]‐ <text:line-break/><text:span text:style-name="T1"> </text:span><text:span text:style-name="T2">(9/27) </text:span> ⲃⲁⲗ ϩⲓⲧⲟⲟⲧⲟⲩ ⲧ̣ⲉ̣ϥⲥⲃⲱ ⲛ̅ⲇⲉ ⲧⲉ ⲧⲉ̣‐ <text:line-break/><text:span text:style-name="T1"> </text:span><text:span text:style-name="T2">(9/28) </text:span> ⲉⲓ ϫⲉ ⲙ̅ⲛ̅ⲙⲟⲩⲧⲉ̣ ⲛⲏⲧ̅ⲛ̅ ⲁⲉⲓⲱⲧ ϩⲓϫ̅ⲛ̣̅ <text:line-break/><text:span text:style-name="T1"> </text:span><text:span text:style-name="T2">(9/29) </text:span> ⲡⲕⲁϩ ⲟⲩⲉⲉⲓ ⲡ[ⲉ] ⲡ̣ⲉⲧ̅ⲛ̅ⲉⲓⲱⲧ ⲉⲑ̅ⲛ̅ <text:line-break/><text:span text:style-name="T1"> </text:span><text:span text:style-name="T2">(9/30) </text:span> ⲛ̅ⲙ̅ⲡⲏⲩⲉ ⲛ̅ⲧ̣ⲱ̣ⲧ̅ⲛ̅ ⲡⲉ ⲡⲟⲩⲁⲉⲓⲛ ⲙ̅‐ <text:line-break/><text:span text:style-name="T1"> </text:span><text:span text:style-name="T2">(9/31) </text:span> ⲡⲕⲟⲥⲙⲟⲥ ⲛⲁⲥⲛⲏⲩ ⲁⲩⲱ ⲛⲁϣⲃ̅ⲣ̅ <text:line-break/><text:span text:style-name="T1"> </text:span><text:span text:style-name="T2">(9/32) </text:span> ⲕⲟⲓⲛⲱⲛⲟⲥ ⲛⲉϯⲣⲉ ⲙ̅ⲡⲟⲩⲱϣⲉ <text:line-break/><text:span text:style-name="T1"> </text:span><text:span text:style-name="T2">(9/33) </text:span> ⲙ̅[ⲡ]ⲉⲓⲱⲧ ⲉⲩ ⲛ̅ⲅⲁⲣ ⲡⲉ ⲫⲏⲩ ⲉⲕϣⲁⲛ‐ <text:line-break/><text:span text:style-name="T1"> </text:span><text:span text:style-name="T2">(9/34) </text:span> ϯ ϩⲏⲩ ⲙ̅ⲡⲕⲟⲥⲙⲟⲥ ⲛ̅ⲕϯ ⲁⲥⲓ ⲛ̅ⲧⲉⲕ <text:line-break/><text:span text:style-name="T1"> </text:span><text:span text:style-name="T2">(9/35) </text:span> ⲯⲩⲭⲏ ⲉⲛϣⲟⲟⲡ ⲛ̅ⲅⲁⲣ ϩ̅ⲛ̣̅̅ ⲡ̣ⲕⲉⲕⲉⲓ <text:line-break/><text:span text:style-name="T1"> </text:span><text:span text:style-name="T2">(9/36) </text:span> ⲛⲉⲛⲙⲟⲩⲧⲉ ⲁϩⲁϩ ϫⲉ ⲉⲓⲱⲧ%6 ⲉⲛⲟⲉⲓ <text:line-break/><text:soft-page-break/><text:span text:style-name="T1"> </text:span><text:span text:style-name="T2">(9/37) </text:span> ⲛ̅ⲁⲧⲥⲁⲩⲛⲉ ⲁⲡ[ⲉ]ⲓ̣ⲱⲧ ⲙ̅ⲙⲏⲉ ⲁⲩⲱ <text:line-break/><text:span text:style-name="T1"> </text:span><text:span text:style-name="T2">(9/38) </text:span> ⲡⲉⲉⲓ ⲡⲉ ⲡⲛ[ⲁ]ϭ̣ ⲛ̣̅ⲱ̣ ⲛ̣̅ⲛⲛ̣ⲁ̣ⲃⲉⲓ ⲧⲏ‐ <text:line-break/><text:span text:style-name="T1"> </text:span><text:span text:style-name="T2">(10/1) </text:span> [ⲣⲟⲩ <text:line-break/><text:span text:style-name="T1"> </text:span><text:span text:style-name="T2">(10/7) </text:span> (Lines 1--7 lacking) <text:line-break/><text:span text:style-name="T1"> </text:span><text:span text:style-name="T2">(10/8) </text:span> [ 14+- ]ϣ[.].ⲥ. <text:line-break/><text:span text:style-name="T1"> </text:span><text:span text:style-name="T2">(10/9) </text:span> [ 12+- ϩⲏ]ⲇ̣ⲟⲛⲏ ⲉⲛⲧ̅ⲛ̅‐ <text:line-break/><text:span text:style-name="T1"> </text:span><text:span text:style-name="T2">(10/10) </text:span> [ⲧⲁⲛⲧ....].[ 8+- ]ⲁ̣ⲉⲓϥ̅ ⲛ̅ϣ̣[ <text:line-break/><text:span text:style-name="T1"> </text:span><text:span text:style-name="T2">(10/11) </text:span> [ 7+- ]ⲯ̣ⲩⲭ[ⲏ.....ⲣ]ⲱ̣ⲙⲉ ⲉⲩⲉ̣[ <text:line-break/><text:span text:style-name="T1"> </text:span><text:span text:style-name="T2">(10/12) </text:span> [ 6+- ]ⲙⲟ ϫⲉ.[ 7+- ]ⲉ̣ⲡⲙⲁ ⲛ̣̅[ϣⲱ]‐ <text:line-break/><text:span text:style-name="T1"> </text:span><text:span text:style-name="T2">(10/13) </text:span> [ⲡⲉ ⲉⲩ] ⲛ̅ⲇⲉ ⲡⲉ ⲧⲡ̣[ⲓⲥⲧⲓⲥ ⲛ̅ⲧⲁϥⲧ]ⲉⲉⲓ̣[ⲥ̅ ⲁϩⲣⲏ]‐ <text:line-break/><text:span text:style-name="T1"> </text:span><text:span text:style-name="T2">(10/14) </text:span> [ⲓ̈ ⲛ̅]ϭⲓ ⲡⲥⲁϩ ⲉⲧⲁ[ϥⲕⲁ]ⲁϥ [ⲁⲃⲁ]ⲗ̣ [ϩ̅ⲛ̅ ⲧⲛⲁϭ] <text:line-break/><text:span text:style-name="T1"> </text:span><text:span text:style-name="T2">(10/15) </text:span> [ⲛ̅5̅0̅ⲙ̅]̅ⲛ̅50ⲧⲁⲧⲥⲁⲩⲛⲉ ⲁ̣[ⲩ]ⲱ ⲡ[ⲕⲉ]ⲕⲉⲓ̣ [ⲙ̅ⲡ]ⲃⲉ̣[ⲗ] <text:line-break/><text:span text:style-name="T1"> </text:span><text:span text:style-name="T2">(10/16) </text:span> [ⲛ̅ⲁⲧ]ϩⲏⲧ ⲁϥⲧⲣ̅ϥ̅ⲣ̅[ⲡ]ⲙ̣ⲉⲩ̣[ⲉ] ⲛ̅ⲛ̅ⲁⲅⲁⲑⲟⲛ <text:line-break/><text:span text:style-name="T1"> </text:span><text:span text:style-name="T2">(10/17) </text:span> [ⲙ̅ⲡⲉⲓ]ⲱⲧ ⲙ̅ⲛ̅ ⲡ̣[ⲅ]ⲉⲛⲟⲥ ⲡ̣ⲁϫⲉϥ ⲛ̅ⲅⲁⲣ <text:line-break/><text:span text:style-name="T1"> </text:span><text:span text:style-name="T2">(10/18) </text:span> [ⲛⲉϥ ϫ]ⲉ̣ ⲡⲕⲟⲥⲙ[ⲟⲥ] ⲡⲱⲕ ⲛ̅ⲅⲁⲣ ⲉⲛ ⲡⲉ ⲛ̅‐ <text:line-break/><text:span text:style-name="T1"> </text:span><text:span text:style-name="T2">(10/19) </text:span> [ⲛⲉⲕⲱ]ⲡ ⲛ̅ⲧ̣[ⲙⲟⲣ]ⲫⲏ ⲉⲧ̅ⲛ̣̅̅[ϩ]ⲏ̣ⲧ̅ϥ̅ ϫⲉ ⲟⲩϩⲏⲩ <text:line-break/><text:span text:style-name="T1"> </text:span><text:span text:style-name="T2">(10/20) </text:span> [ⲡⲉ ⲁⲗ]ⲗ̣ⲁ ⲟⲩ[ⲁⲑⲏ]ⲩ̣ ⲙ̅ⲛ̣̅̅ [ⲟⲩⲕ]ⲟ̣ⲗⲁⲥⲓⲥ ϫⲓ ⲧ‐ <text:line-break/><text:span text:style-name="T1"> </text:span><text:span text:style-name="T2">(10/21) </text:span> [ⲥⲃⲱ] ⲛ̣̅ⲇ̣[ⲉ ⲙ̅ⲡⲉⲉⲓ ⲛ̅ⲧⲁϩ]ⲟⲩⲛϭⲛⲟⲩ‐ <text:line-break/><text:span text:style-name="T1"> </text:span><text:span text:style-name="T2">(10/22) </text:span> [ϭϥ̅ ⲟⲩ]ϩⲏⲩ ⲙ̣ⲛ̣̅ [ⲟⲩⲛⲁϥⲣⲉ ⲛ̅]ⲧ̣ⲯⲩⲭⲏ ⲁⲩ‐ <text:line-break/><text:span text:style-name="T1"> </text:span><text:span text:style-name="T2">(10/23) </text:span> [ⲱ ⲛ̅]ⲧ̣ⲉϫⲓ ⲙ̅ⲡⲉ[ϥⲥⲭⲏⲙⲁ ⲡ]ⲓ̣ⲥⲭⲏⲙⲁ <text:line-break/><text:span text:style-name="T1"> </text:span><text:span text:style-name="T2">(10/24) </text:span> [ⲡⲉ]ⲧϣⲟⲟⲡ ϩⲁⲧ̣[ⲉϩ]ⲏ̣ [ⲙ̅ⲡⲓ]ⲱⲧ ⲡ̣ⲗⲟⲅⲟⲥ <text:line-break/><text:span text:style-name="T1"> </text:span><text:span text:style-name="T2">(10/25) </text:span> [ⲁ]ⲩ̣ⲱ ⲡϫⲓⲥⲉ ⲡⲉⲉ̣ⲓ̣ [ⲁ]ⲧ̣ⲣⲉ[ⲥ]ⲁⲩⲛⲉ ⲙ̅ⲙⲁϥ <text:line-break/><text:span text:style-name="T1"> </text:span><text:span text:style-name="T2">(10/26) </text:span> [ⲉ]ⲙⲡⲁⲧⲉⲣ̅ⲡⲗⲁⲛ[ⲁ] ⲉ̣〈ⲣⲉ〉ϣⲟⲟⲡ ⲛ̅ⲥⲁⲣⲝ <text:line-break/><text:span text:style-name="T1"> </text:span><text:span text:style-name="T2">(10/27) </text:span> ⲛ̅ⲧⲉ ⲕⲁⲧⲁⲇⲓⲕⲏ ϩⲟⲙ̣ⲟ̣ⲓⲱⲥ ⲁⲉⲓⲥⲃⲁⲕ ⲁ‐ <text:line-break/><text:span text:style-name="T1"> </text:span><text:span text:style-name="T2">(10/28) </text:span> ⲡ̣ⲉϩⲟⲩⲟ ϫⲉⲕⲁⲥⲉ ϩⲓⲧ̣̅̅ⲛ̅ ⲡⲁⲑ̅ⲃ̅ⲉⲓⲟ ⲉⲉⲓ̣‐ <text:line-break/><text:span text:style-name="T1"> </text:span><text:span text:style-name="T2">(10/29) </text:span> ⲛⲁϫⲓⲧⲉ ⲁϩⲣⲏⲓ̈ ⲁⲡ̣ⲓ̣ⲛ̣ⲁϭ ⲛ̅ϫⲓⲥⲉ ⲡⲙⲁ <text:line-break/><text:span text:style-name="T1"> </text:span><text:span text:style-name="T2">(10/30) </text:span> ⲛ̅ⲧⲁϩⲁϩⲁⲉⲓⲉ ⲁⲃⲁⲗ ⲛ̅ϩⲏⲧ̅ϥ̅ ⲁϩⲟⲩϫⲓ <text:line-break/><text:span text:style-name="T1"> </text:span><text:span text:style-name="T2">(10/31) </text:span> ⲙ̅ⲙⲟ ⲁⲡⲉⲉⲓϩⲓⲉⲓⲧ%6 ⲉⲣⲉϣⲁⲛⲡⲓⲥⲧⲉⲩ‐ <text:line-break/><text:span text:style-name="T1"> </text:span><text:span text:style-name="T2">(10/32) </text:span> ⲉ ϭⲉ̣ ⲁⲣⲁⲉⲓ ⲁⲛⲁⲕ ⲡⲉ ⲉⲧⲁϫⲓⲧⲉ ⲁⲡ̣ⲥ̣ⲁⲛ <text:line-break/><text:span text:style-name="T1"> </text:span><text:span text:style-name="T2">(10/33) </text:span> ⲧⲡⲉ ϩⲓⲧ̅ⲛ̅ ⲡⲓⲥⲭⲏⲙⲁ ⲉⲧⲉⲛⲉⲩ ⲁⲣⲁ̣ϥ <text:line-break/><text:span text:style-name="T1"> </text:span><text:span text:style-name="T2">(10/34) </text:span> ⲁⲛⲁⲕ ⲡⲉ ⲉⲧⲁⲃⲓⲧⲉ ϩⲓ ⲛⲁⲛⲁϩⲃⲉ· ⲃⲱⲕ <text:line-break/><text:span text:style-name="T1"> </text:span><text:span text:style-name="T2">(10/35) </text:span> ⲁϩⲟⲩⲛ̣ ϩⲓⲧ̅ⲛ̅ ⲡⲉⲥⲡⲉⲓⲣ ⲡⲙⲁ ⲛ̅ⲧⲁϩⲁⲉⲓ <text:line-break/><text:span text:style-name="T1"> </text:span><text:span text:style-name="T2">(10/36) </text:span> ⲁⲃⲁⲗ ⲙ̅ⲙⲉⲩ ⲁⲩⲱ ϩⲱⲡ ⲙ̅ⲙⲟ ⲁⲛⲉⲑⲏ‐ <text:line-break/><text:span text:style-name="T1"> </text:span><text:span text:style-name="T2">(10/37) </text:span> ⲣⲓⲟⲛ ⲡⲓⲫⲟⲣⲏⲙⲁ [ⲉ]ⲧⲉⲣ̅ⲫⲟⲣⲉⲓ ⲙ̅ⲙⲁϥ <text:line-break/><text:span text:style-name="T1"> </text:span><text:span text:style-name="T2">(10/38) </text:span> ϯⲛⲟⲩ ⲙ̅ⲡⲱ̣ ⲉ̣ⲛ̣ [ⲡ]ⲉ [ⲉⲣⲉ]ϣⲁⲛⲃⲱⲕ <text:line-break/><text:span text:style-name="T1"> </text:span><text:span text:style-name="T2">(11/11) </text:span> (Lines 1--11 lacking) <text:line-break/><text:span text:style-name="T1"> </text:span><text:span text:style-name="T2">(11/12) </text:span> [ 15+- ]ⲡⲓ.[ <text:line-break/><text:span text:style-name="T1"> </text:span><text:span text:style-name="T2">(11/13) </text:span> [ 14+- ]ⲱⲙⲁ.[ <text:line-break/><text:span text:style-name="T1"> </text:span><text:span text:style-name="T2">(11/14) </text:span> [ 11+- ]ⲉ̣ⲛⲉⲩⲛ.[ <text:line-break/><text:span text:style-name="T1"> </text:span><text:span text:style-name="T2">(11/15) </text:span> [ 13+- ⲁⲃⲁ]ⲗ̣ ϩ̅ⲙ̅ ⲡⲉϥⲉⲁⲩ̣[ <text:line-break/><text:span text:style-name="T1"> </text:span><text:span text:style-name="T2">(11/16) </text:span> ⲏ̣ⲛ̣[..] ⲧ̣ⲛ̣[ 8+- ]ⲑⲉ ϫⲓⲛ ⲛ̅ϣⲁ̣[ⲣ̅ⲡ̅] <text:line-break/><text:span text:style-name="T1"> </text:span><text:span text:style-name="T2">(11/17) </text:span> ⲁⲃⲁⲗ̣ ϩ̅ⲙ̅ ⲡ[ⲧ̅ⲣϥ̅ⲁ]ⲡϥ̅ ⲙ̅ⲛ̅ ⲧⲉⲥϩⲓⲙ̣[ⲉ] <text:line-break/><text:span text:style-name="T1"> </text:span><text:span text:style-name="T2">(11/18) </text:span> ϩⲁⲡϩⲓⲛⲏ[ϥ ⲛ̅ ⲡϩⲓⲥ]ⲉ ⲙ̅ⲛ̅ ⲡⲥ[ⲁ]ⲃ̣ⲃ̣[ⲁ]‐ <text:line-break/><text:span text:style-name="T1"> </text:span><text:span text:style-name="T2">(11/19) </text:span> ⲧⲟⲛ ⲉⲧⲉ ⲡⲉ̣[ⲉⲓ ⲡⲉ ⲡⲕⲟ]ⲥⲙⲟⲥ ⲁ̣[ⲃⲁⲗ ⲛ̅] <text:line-break/><text:span text:style-name="T1"> </text:span><text:span text:style-name="T2">(11/20) </text:span> ⲅⲁⲣ ϩ̅ⲛ̅ ⲡ5̅0ⲧ̣[ⲣ̅50ϥⲉⲉⲡ̅ϥ̅ ⲙ]ⲛ̣̅ ⲡⲉⲓⲱ̣[ⲧ ϩⲁⲡ]‐ <text:line-break/><text:span text:style-name="T1"> </text:span><text:span text:style-name="T2">(11/21) </text:span> ϩⲓⲛⲏ̣ϥ ⲁ̣[ϥⲛ̅ ⲡⲥⲁⲃⲃⲁⲧ]ⲟ̣ⲛ ⲙ̅ⲛ̣̅̅ [ⲡⲉⲓ] <text:line-break/><text:span text:style-name="T1"> </text:span><text:span text:style-name="T2">(11/22) </text:span> ⲁⲃⲁⲗ ϩ̅ⲛ̅ ⲡ̣[ⲕⲟⲥⲙⲟⲥ ⲛ̅]ⲛ̣̅[ⲑ]ⲏⲣ̣[ⲓⲟⲛ ⲟⲩ] <text:line-break/><text:soft-page-break/><text:span text:style-name="T1"> </text:span><text:span text:style-name="T2">(11/23) </text:span> ⲁⲃⲁⲗ ϩ̣ⲓ̣〈ⲛ̅〉ⲑ̣[ⲏⲣⲓⲟⲛ] ⲛ̣̅ⲅ̣ⲁⲣ [ⲡ]ⲉ ⲡⲕⲟ̣[ⲥⲙⲟⲥ] <text:line-break/><text:span text:style-name="T1"> </text:span><text:span text:style-name="T2">(11/24) </text:span> ⲁⲩⲱ ⲟⲩ[ⲑⲏⲣⲓⲟⲛ] ⲡ̣ⲉ ⲉⲧⲃⲉ ⲡⲉⲉⲓ ⲡ̣[ⲉⲉⲓ] <text:line-break/><text:span text:style-name="T1"> </text:span><text:span text:style-name="T2">(11/25) </text:span> ⲉⲧⲥⲁⲣ̣̅̅ⲙ̅ ⲁ̣[ⲩⲁⲡ̅ϥ̅ ⲁⲡⲉ]ⲡⲓⲃⲟⲩⲗⲟⲥ ⲉ[ⲣⲉⲡⲏ] <text:line-break/><text:span text:style-name="T1"> </text:span><text:span text:style-name="T2">(11/26) </text:span> ⲁⲃⲁⲗ ⲛ̅ⲇⲉ̣ [ϩ̅ⲛ̅ ⲛⲓⲑⲏ]ⲣⲓⲟⲛ ⲛ̅ⲧⲁϩⲓ ⲁⲃ̣[ⲁⲗ] <text:line-break/><text:span text:style-name="T1"> </text:span><text:span text:style-name="T2">(11/27) </text:span> ⲁⲩϫⲟ ⲁϫⲱ[ϥ ⲛ̅ⲟⲩ]ϣⲧⲏⲛ ⲛ̅ⲧ̣ⲉ ⲧⲕⲁⲧ̣[ⲁ]‐ <text:line-break/><text:span text:style-name="T1"> </text:span><text:span text:style-name="T2">(11/28) </text:span> ⲇⲓⲕⲏ ⲛⲉ5̅0̅ⲙ̅[̅ⲛ̅50ⲧⲉ ⲧⲉ]ⲥϩⲓⲙⲉ ⲛ̅ⲅⲁⲣ ⲕⲉⲗⲁⲩ̣‐ <text:line-break/><text:span text:style-name="T1"> </text:span><text:span text:style-name="T2">(11/29) </text:span> ⲉ ⲛ̅ϩ̅ⲃ̅ⲥⲟⲩ [ⲉⲥϫ]ⲟ̣ ⲁϫⲱϥ ⲙ̅ⲡⲉⲥⲥⲡⲉⲣ̣‐ <text:line-break/><text:span text:style-name="T1"> </text:span><text:span text:style-name="T2">(11/30) </text:span> ⲙⲁ ⲉⲓⲙⲏⲧ̣[ⲓ ⲁ]ⲡ̣[ⲉ]ⲛⲧⲁⲥϣ̅ⲣ̅ⲡ̅ ⲛ̅ⲛ̅ⲧϥ̅ <text:line-break/><text:span text:style-name="T1"> </text:span><text:span text:style-name="T2">(11/31) </text:span> ϩ̅ⲛ̅ ⲡⲥⲁⲃ[ⲃ]ⲁ̣ⲧⲟⲛ ⲙ̅ⲛ̅ⲑⲏⲣⲓⲟⲛ ⲅⲁⲣ <text:line-break/><text:span text:style-name="T1"> </text:span><text:span text:style-name="T2">(11/32) </text:span> ϣⲟⲟⲡ ϩ̅ⲙ̅ [ⲡ]ⲁ̣ⲓⲱⲛ ⲙⲁⲣⲉⲡⲓⲱⲧ ⲛ̅ⲅⲁⲣ <text:line-break/><text:span text:style-name="T1"> </text:span><text:span text:style-name="T2">(11/33) </text:span> ⲣ̣̅ⲥ̣ⲁ̣ⲃⲃⲁⲧⲟ[ⲛ] ⲁ̣ⲗⲗⲁ ⲉϥ̅ⲣ̅ϩⲱϥ̅ ⲁⲡϣⲏ‐ <text:line-break/><text:span text:style-name="T1"> </text:span><text:span text:style-name="T2">(11/34) </text:span> ⲣⲉ ⲁⲩⲱ ϩⲓⲧ̣[ⲙ̅] ⲡϣⲏⲣⲉ ⲁϥⲟⲩⲱϩ ⲁⲧⲟ‐ <text:line-break/><text:span text:style-name="T1"> </text:span><text:span text:style-name="T2">(11/35) </text:span> ⲟⲧ̅ϥ̅ ⲉϥⲧ̅ⲛ̅ ⲛ̣[ⲉ]ϥ ⲛ̅ⲛⲁⲓⲱⲛ ⲟⲩⲛⲧⲉ ⲡⲓ‐ <text:line-break/><text:span text:style-name="T1"> </text:span><text:span text:style-name="T2">(11/36) </text:span> ⲱⲧ ϩ̅ⲛ̅ⲥⲧⲟ̣[ⲓⲭ]ⲉⲓⲟⲛ ⲛ̅ⲗⲟⲅⲓⲕⲟⲛ ⲉⲩⲁ‐ <text:line-break/><text:span text:style-name="T1"> </text:span><text:span text:style-name="T2">(11/37) </text:span> ⲁⲛϩ ⲛⲉⲉⲓ [ⲁ]ⲃⲁⲗ ⲛ̅ϩⲏⲧⲟⲩ ⲉϥϯ ϩⲓ‐ <text:line-break/><text:span text:style-name="T1"> </text:span><text:span text:style-name="T2">(11/38) </text:span> ⲱϥ ⲛ̅ⲛⲁⲙ̣[ⲉⲗⲟⲥ 5̅0̅ⲛ̅50]ⲛ̅ϩ̅ϥ̅ⲥⲟⲩ· ⲡⲣⲱⲙⲉ <text:line-break/><text:span text:style-name="T1"> </text:span><text:span text:style-name="T2">(12/9) </text:span> (Lines 1--9 lacking) <text:line-break/><text:span text:style-name="T1"> </text:span><text:span text:style-name="T2">(12/10) </text:span> [ 7+- ].ϫ̣[ <text:line-break/><text:span text:style-name="T1"> </text:span><text:span text:style-name="T2">(12/11) </text:span> [ 6+- ].ⲉⲧⲉ̣[ <text:line-break/><text:span text:style-name="T1"> </text:span><text:span text:style-name="T2">(12/12) </text:span> [.....]ⲥⲓⲥⲡ.[ ⲡⲉ] <text:line-break/><text:span text:style-name="T1"> </text:span><text:span text:style-name="T2">(12/13) </text:span> [ⲉⲓ]ⲡⲉ ⲡⲣⲉⲛ ⲡ̣[ ⲁϥ]‐ <text:line-break/><text:span text:style-name="T1"> </text:span><text:span text:style-name="T2">(12/14) </text:span> [ⲡ]ⲁ̣ϩⲧϥ̅ ⲁⲃⲁⲗ ⲙ̅[ⲙⲓⲛ ⲙ̅ⲙⲁϥ] ⲁ̣[ⲩⲱ] ⲁ̣ϥ̣‐ <text:line-break/><text:span text:style-name="T1"> </text:span><text:span text:style-name="T2">(12/15) </text:span> [ⲡ]ⲱ̣ϩⲧ ⲁⲃⲁⲗ ⲙ̅ⲡ̣[ⲣⲉϥⲛⲁϭ]ⲛ̅ϭ [ⲡⲉ]ⲛ‐ <text:line-break/><text:span text:style-name="T1"> </text:span><text:span text:style-name="T2">(12/16) </text:span> [ⲧⲁ]ϩϫⲓ ⲛⲁϭⲛ̅ϭ [ⲁϥⲣ̅ϣ]ⲃ̣ⲉⲓⲱ ⲙ̅ⲡⲣⲉⲛ̣ <text:line-break/><text:span text:style-name="T1"> </text:span><text:span text:style-name="T2">(12/17) </text:span> [ϩⲁϩ]ⲧ̅ⲛ̅ ⲛ̅ⲇⲉ ⲡ̣[ⲉⲉⲓ ⲉⲧⲛ]ⲁ̣ⲉⲓⲛⲉ ⲁⲡⲛⲁ‐ <text:line-break/><text:span text:style-name="T1"> </text:span><text:span text:style-name="T2">(12/18) </text:span> [ϭⲛ̅]ϭ̣ ⲁϥⲟⲩⲱ̣[ⲛ̅ϩ̅ ⲁⲃⲁ]ⲗ̣ ⲛ̅ⲥⲁⲣⲝ ⲁⲩⲱ <text:line-break/><text:span text:style-name="T1"> </text:span><text:span text:style-name="T2">(12/19) </text:span> [ⲡⲓⲣ]ⲉϥϣ[ⲱⲥ ⲙⲛ̅ⲧⲉϥ ⲥⲁ]ϩⲛⲉ ⲛ̅ϥ̅ⲣ̅ ⲭⲣⲉⲓ‐ <text:line-break/><text:span text:style-name="T1"> </text:span><text:span text:style-name="T2">(12/20) </text:span> [ⲁ ⲉⲛ] ⲙ̅ⲡⲉⲁ̣[ⲩ ⲉⲧⲉ ⲡⲱϥ ⲉⲛ] ⲡⲉ ⲟⲩⲛⲧⲉϥ̅ <text:line-break/><text:span text:style-name="T1"> </text:span><text:span text:style-name="T2">(12/21) </text:span> [ⲙ̅ⲙⲉ]ⲩ ⲙ̅ⲡ̣̅̅ϥ̣̅̅[ⲉⲁⲩ ⲙ̅ⲙⲓⲛ]ⲙ̣̅ⲙ̣ⲁϥ ϩⲁⲧ̅ⲛ̅ ⲡⲓ‐ <text:line-break/><text:span text:style-name="T1"> </text:span><text:span text:style-name="T2">(12/22) </text:span> [ⲣⲉⲛ ⲉ]ⲧ̣ⲉ ⲡ[ϣⲏ]ⲣⲉ ⲡ̣ⲉ̣ [ⲛ̅ⲧⲁϥ]ⲉⲓ ⲛ̅ⲇⲉ ⲁⲧ̅ⲣ̅ⲛ̅‐ <text:line-break/><text:span text:style-name="T1"> </text:span><text:span text:style-name="T2">(12/23) </text:span> [ϣ]ⲱ̣ⲡⲉ ⲉⲛϩⲁ ⲉⲁⲩ [ϩⲓⲧⲛ̅ ⲡⲣⲉ]ϥϣⲱⲥ <text:line-break/><text:span text:style-name="T1"> </text:span><text:span text:style-name="T2">(12/24) </text:span> [ⲉⲧ]ϣⲟⲟⲡ ⲛ̅ⲛⲓⲙ̣[ⲁ ⲛ̅ⲧⲉ ⲡ]ϣ̣ⲱⲥ̣ ⲁⲃⲁⲗ̣ <text:line-break/><text:span text:style-name="T1"> </text:span><text:span text:style-name="T2">(12/25) </text:span> [ⲛ̅]ⲇ̣ⲉ ϩⲓⲧ%6ⲟⲟⲧ̅ϥ̅ ⲛ̅[ϭⲓ ⲡⲉⲉⲓ] ⲛ̣̅ⲧⲁϩϫⲓ ⲛⲁ‐ <text:line-break/><text:span text:style-name="T1"> </text:span><text:span text:style-name="T2">(12/26) </text:span> ϭⲛ̅ϭ ⲧ̅ⲛ̅ϫⲓ ⲙ̅ⲡⲕ̣[ⲱⲉ ⲁⲃ]ⲁ̣ⲗ ⲛ̅ⲛ̅ⲛⲁⲃⲓ <text:line-break/><text:span text:style-name="T1"> </text:span><text:span text:style-name="T2">(12/27) </text:span> ϩⲓⲧⲟⲟⲧ̅ϥ̅ ⲛ̅ⲇⲉ ⲛ̅ⲡ̣[ⲉⲛⲧ]ⲁ̣ϩⲟⲩⲛϭⲛⲟⲩ <text:line-break/><text:span text:style-name="T1"> </text:span><text:span text:style-name="T2">(12/28) </text:span> ϭϥ̅ ⟦ⲙ̅ⲛ̅⟧ ⲁⲩⲱ ⲡⲉⲛⲧ̣[ⲁϩⲟⲩⲥ]ⲁⲧ̅ϥ̅ ⲉⲛϫⲓ ⲛ̅‐ <text:line-break/><text:span text:style-name="T1"> </text:span><text:span text:style-name="T2">(12/29) </text:span> ⲧⲭⲁⲣⲓⲥ ⲛⲓⲙ ⲛ̅ⲇⲉ ⲡ̣[ⲉ ⲡⲉ]ⲉ̣ⲓ ⲛ̅ⲧⲁϩⲥⲱⲧⲉ <text:line-break/><text:span text:style-name="T1"> </text:span><text:span text:style-name="T2">(12/30) </text:span> ⲙ̅ⲡⲉⲛⲧⲁⲩⲛϭⲛⲟⲩϭ[ϥ̅] ⲧ̣ⲁⲡⲟϩⲣⲟⲓⲁ <text:line-break/><text:span text:style-name="T1"> </text:span><text:span text:style-name="T2">(12/31) </text:span> ⲙ̅ⲡⲣⲉⲛ ⲡⲉ ⲛ̅ⲑⲉ ⲅⲁⲣ ⲉ̣[ⲧ]ⲉ ⲧⲥⲁⲣⲝ ⲣ̅ ⲭⲣⲉⲓ‐ <text:line-break/><text:span text:style-name="T1"> </text:span><text:span text:style-name="T2">(12/32) </text:span> ⲁ ⲛ̅ⲟⲩⲣⲉⲛ ⲧⲉⲉⲓ ⲧⲉ ⲑⲉ [ⲧⲥ]ⲁⲣⲝ ⲟⲩⲁⲓⲱⲛ̣ <text:line-break/><text:span text:style-name="T1"> </text:span><text:span text:style-name="T2">(12/33) </text:span> ⲡⲉ ⲛ̅ⲧⲁϩⲁⲧⲥⲟⲫⲓⲁ ⲧⲉⲩ[ⲁ]ϥ̣̅ ⲁⲃⲁⲗ ⲁ̣ϥ̣‐ <text:line-break/><text:span text:style-name="T1"> </text:span><text:span text:style-name="T2">(12/34) </text:span> ϣⲱⲡ ⲁⲣⲁϥ ⲙ̅ⲡⲙⲉⲅⲉⲑ̣[ⲟⲥ] ⲉⲧ̅ⲛ̅ⲛⲏⲩ ⲁⲡⲓ‐ <text:line-break/><text:span text:style-name="T1"> </text:span><text:span text:style-name="T2">(12/35) </text:span> ⲧ̅ⲛ̅ ϫⲉⲕⲁⲥⲉ ⲉⲣⲉⲡⲁⲓⲱⲛ̣ [ⲛ]ⲁⲃⲱⲕ ⲁϩⲟⲩⲛ <text:line-break/><text:span text:style-name="T1"> </text:span><text:span text:style-name="T2">(12/36) </text:span> ⲁⲡⲉⲛⲧⲁⲩⲛ̅ϭⲛⲟⲩϭ̅ϥ̅ [ⲁ]ⲧ̣ⲣ̅ⲛ̅ⲗ̅ⲃⲁⲗ ⲁ‐ <text:line-break/><text:span text:style-name="T1"> </text:span><text:span text:style-name="T2">(12/37) </text:span> ⲡⲛⲁϭⲛ̅ϭ ⲙ̅ⲡϣⲉ̣ⲗ̣ ⲁ̣[ⲩ]ⲱ ⲛ̅ⲥⲉϫⲡⲁⲛ <text:line-break/><text:span text:style-name="T1"> </text:span><text:span text:style-name="T2">(12/38) </text:span> ⲛ̅ⲕⲉⲥⲁⲡ ϩ̅ⲛ̅ ⲧⲥⲁⲣ̣[ⲝ ⲁⲩⲱ 5̅0ϩⲙ̅50] ⲡⲥⲛⲁϥ ⲛ̅ <text:line-break/><text:span text:style-name="T1"> </text:span><text:span text:style-name="T2">(13/8) </text:span> (Lines 1--8 lacking) <text:line-break/><text:soft-page-break/><text:span text:style-name="T1"> </text:span><text:span text:style-name="T2">(13/9) </text:span> [...ⲑⲓⲙⲁ]ⲣ̣ⲙⲉ̣[ⲛ]ⲏ ϥ̅[ <text:line-break/><text:span text:style-name="T1"> </text:span><text:span text:style-name="T2">(13/10) </text:span> [...]ⲉ̣ ⲁ̣ⲩ̣ⲱ ⲛⲁ̣ⲓⲱⲛ ⲉ̣[ <text:line-break/><text:span text:style-name="T1"> </text:span><text:span text:style-name="T2">(13/11) </text:span> [ⲁⲩ]ϣⲱⲡ ⲁⲣⲁⲩ ⲙ̅ⲡϣⲏ[ⲣⲉ ⲉⲛⲉϥϣⲟ]‐ <text:line-break/><text:span text:style-name="T1"> </text:span><text:span text:style-name="T2">(13/12) </text:span> [ⲟ]ⲡ̣ ⲙ̅ⲙⲩⲥⲧⲏⲣ̣ⲓ̣ⲟⲛ ⲧⲏⲣ̅[̅ϥ̅ <text:line-break/><text:span text:style-name="T1"> </text:span><text:span text:style-name="T2">(13/13) </text:span> [ⲡ]ⲟⲩⲉ[ⲉⲓ] ⲡ[ⲟⲩⲉ]ⲉⲓ ⲛ̣̅ⲛⲉϥⲙⲉⲗ̣[ⲟⲥ <text:line-break/><text:span text:style-name="T1"> </text:span><text:span text:style-name="T2">(13/14) </text:span> [ 6+- ]ϯ̣.[...].[...]ⲉ̣ ⲛ̅ⲟⲩⲭⲁⲣⲓⲥ ⲛ̣̅[ⲧⲁ]‐ <text:line-break/><text:span text:style-name="T1"> </text:span><text:span text:style-name="T2">(13/15) </text:span> [ⲣ]ⲉ̣[ϥⲁ]ϣϭⲏ̣[ⲗ] ⲙ̅ⲙ[ⲉⲛ] ⲁⲩⲡⲱⲣϫ ⲙ̅ⲡ̣[ⲏ] <text:line-break/><text:span text:style-name="T1"> </text:span><text:span text:style-name="T2">(13/16) </text:span> ⲁⲃⲁⲗ̣ ϩ̅ⲛ̅ ⲧⲉⲕⲕⲗⲏ[ⲥⲓ]ⲁ ⲛ̅ⲑⲉ ϩ̅ⲛ̅ⲧⲁⲓ̣[ⲉ ⲙ̅]‐ <text:line-break/><text:span text:style-name="T1"> </text:span><text:span text:style-name="T2">(13/17) </text:span> ⲡⲕⲉⲕⲉⲓ ⲁⲃⲁ̣ⲗ̣ ϩ̅ⲛ̣̅̅ ⲧⲙⲉⲉⲩ ⲛⲉϥⲟⲩⲣⲓ̣[ⲧⲉ] <text:line-break/><text:span text:style-name="T1"> </text:span><text:span text:style-name="T2">(13/18) </text:span> ⲇⲉ ⲁⲩϯ ⲛⲉϥ ⲛ̣̅ϩ̅ⲛ̅ⲓ̣̈ⲭ̣ⲛ̣ⲟⲥ ⲁⲩ̣ⲱ̣ [ⲁⲛⲉⲉⲓ] <text:line-break/><text:span text:style-name="T1"> </text:span><text:span text:style-name="T2">(13/19) </text:span> ⲱⲣϣ ⲛ̅ⲧⲉ̣ϩⲓ̣ⲏ ⲛ̅ⲧ̣[ϭⲓ]ⲛ̅ⲃⲱⲕ ⲁ̣[ϩⲣⲏⲓ̈] <text:line-break/><text:span text:style-name="T1"> </text:span><text:span text:style-name="T2">(13/20) </text:span> ϣⲁ ⲡⲓⲱⲧ ⲉ̣[ⲩ] ⲛ̣̅ⲇⲉ ⲧ̣[ⲉ ⲑⲉ ⲙ̅]→ⲛ̣̅← ⲡⲓⲣⲏ̣[ⲧⲉ ⲉⲧ]‐ <text:line-break/><text:span text:style-name="T1"> </text:span><text:span text:style-name="T2">(13/21) </text:span> ⲁⲥϣⲱⲡ[ⲉ ⲛ]ⲉ̣ⲩ ⲛ̣̅[ϯⲁⲡⲉ ⲛ̅ⲧ]ⲉ ⲛ̣[ⲉⲉⲓ] <text:line-break/><text:span text:style-name="T1"> </text:span><text:span text:style-name="T2">(13/22) </text:span> ⲁⲥⲉⲓⲣⲉ ⲇⲉ ⲡ̣ⲙ̣ⲁ̣ [ⲛ̅ϣⲱⲡⲉ ⲁ]ⲉ̣ⲓ̣[ⲛⲉ ⲁⲃⲁⲗ] <text:line-break/><text:span text:style-name="T1"> </text:span><text:span text:style-name="T2">(13/23) </text:span> ⲙ̅ⲡⲟⲩⲁⲉⲓ[ⲛ ⲛ̅ⲛⲏ] ⲉⲧⲟⲩⲏϩ̣ [ⲛ̅]ϩⲣⲏ[ⲓ̈ ⲛ̅ϩⲏ]‐ <text:line-break/><text:span text:style-name="T1"> </text:span><text:span text:style-name="T2">(13/24) </text:span> ⲧ̅ϥ̅ ϫⲉⲕⲁ̣[ⲥⲉ ⲉⲩ]ⲁ̣ⲛ̣ⲉⲩ ⲁⲧⲉⲕⲕⲗⲏⲥ̣[ⲓⲁ ⲉⲥⲛ̅]‐ <text:line-break/><text:span text:style-name="T1"> </text:span><text:span text:style-name="T2">(13/25) </text:span> ⲛⲏ[ⲩ] ⲁϩⲣ̣[ⲏⲓ̈ ⲛ̅ⲧ]ⲁϩ̣[ⲁ]ⲧ̣ⲁⲡⲉ ⲅⲁⲣ ⲥⲱⲕ [ⲙ̅]‐ <text:line-break/><text:span text:style-name="T1"> </text:span><text:span text:style-name="T2">(13/26) </text:span> ⲙⲁⲥ ⲁϩⲣⲏⲓ̈ ⲁ̣ⲃⲁ̣ⲗ̣ ϩ̣̅̅ⲙ̅ ⲡϩⲓⲉⲓⲧ ⲛ̅ⲧⲁⲩ̣‐ <text:line-break/><text:span text:style-name="T1"> </text:span><text:span text:style-name="T2">(13/27) </text:span> ⲣⲉⲕⲧ̅ⲥ̅ ϩⲓϫⲙ̣̅ ⲡ̣ⲉⲥⲧⲁⲩⲣⲟⲥ ⲁ̣ⲩⲱ ⲁ[ⲥ]‐ <text:line-break/><text:span text:style-name="T1"> </text:span><text:span text:style-name="T2">(13/28) </text:span> ϭⲱϣⲧ̅ ⲁⲡ̣[ⲓ]ⲧ̣̅̅ⲛ̅ ⲁⲡⲧⲁⲣⲧⲁⲣⲟⲥ ϫⲉⲕⲁ[ⲥⲉ] <text:line-break/><text:span text:style-name="T1"> </text:span><text:span text:style-name="T2">(13/29) </text:span> ⲛⲉⲧ̅ⲙ̅ⲡⲥⲁⲛ̣ⲡⲓⲧ̅ⲛ̅ ⲉⲩⲁϭⲱϣⲧ ⲁⲧⲡⲉ̣ <text:line-break/><text:span text:style-name="T1"> </text:span><text:span text:style-name="T2">(13/30) </text:span> ⲛ̅ⲑⲉ ⲛ̅ⲅⲁⲣ ⲛ̣̅ⲟ̣ⲩⲥⲙⲁⲧ ⲉⲣⲉϣⲁⲛⲟⲩⲉⲉⲓ <text:line-break/><text:span text:style-name="T1"> </text:span><text:span text:style-name="T2">(13/31) </text:span> ϭⲱϣⲧ ⲁⲩ[ⲉⲉ]ⲓ̣ ⲧ̣ⲟⲧⲉ ϣⲁⲣⲉ· ⲡϩⲟ ⲙ̅ⲡⲉⲛ‐ <text:line-break/><text:span text:style-name="T1"> </text:span><text:span text:style-name="T2">(13/32) </text:span> ⲧⲁϩϭⲱϣ̣[ⲧ] ⲁⲡⲓⲧ̅ⲛ̅ ϭⲱϣⲧ%6 ⲁⲧⲡⲉ <text:line-break/><text:span text:style-name="T1"> </text:span><text:span text:style-name="T2">(13/33) </text:span> ⲧ̣ⲉⲉⲓ ⲧⲉ ⲑⲉ ⲛ̣̅[ⲧ]ⲁ̣ⲣⲉⲧⲁⲡⲉ ϭⲱϣⲧ ⲁ‐ <text:line-break/><text:span text:style-name="T1"> </text:span><text:span text:style-name="T2">(13/34) </text:span> ⲃⲁⲗ ϩ̅ⲛ̅ ⲡ[ϫⲓ]ⲥⲉ ϣⲁ ⲛⲉϥⲙⲉⲗⲟⲥ ⲁϩⲁⲛ <text:line-break/><text:span text:style-name="T1"> </text:span><text:span text:style-name="T2">(13/35) </text:span> ⲙ̅ⲙⲉⲗⲟⲥ ⲡ̣ⲱ̣ⲧ ⲁⲧⲡⲉ ⲡⲙⲁ ⲛⲉⲣⲉⲧⲁ‐ <text:line-break/><text:span text:style-name="T1"> </text:span><text:span text:style-name="T2">(13/36) </text:span> ⲡⲉ ϣⲟⲟⲡ [ⲙ̅]ⲙⲉⲩ ⲛ̅ⲧⲁϥ ⲛ̅ⲇⲉ ⲡⲉⲥⲧⲁⲩ‐ <text:line-break/><text:span text:style-name="T1"> </text:span><text:span text:style-name="T2">(13/37) </text:span> ⲣⲟⲥ ⲛⲉϥϣⲱ̣ⲡ ⲛ̅ⲱϥ̅ⲧ̅ ⲛ̅ⲙ̅ⲙⲉⲗⲟⲥ <text:line-break/><text:span text:style-name="T1"> </text:span><text:span text:style-name="T2">(13/38) </text:span> ⲁⲩⲱ ⲙⲟⲛⲏ̣ [ϫ]ⲉⲕⲁⲥⲉ ⲉⲩⲁϣϭⲛ̅ϭⲁⲙ <text:line-break/><text:span text:style-name="T1"> </text:span><text:span text:style-name="T2">(14/7) </text:span> (Lines 1--7 lacking) <text:line-break/><text:span text:style-name="T1"> </text:span><text:span text:style-name="T2">(14/8) </text:span> [ 10+- ⲟ]ⲩⲛ̅ⲧ̣ⲉ̣..[ <text:line-break/><text:span text:style-name="T1"> </text:span><text:span text:style-name="T2">(14/9) </text:span> [ 9+- ⲁ]ⲃⲁⲗ ϫⲉ ⲁϩⲟⲩ̣ⲉ̣ⲓ̣ⲛ̣[ⲉ <text:line-break/><text:span text:style-name="T1"> </text:span><text:span text:style-name="T2">(14/10) </text:span> [ 8+- ]ϭⲁⲟⲩⲁⲛ· ⲧⲥⲩⲛⲧⲉⲗⲉⲓ̣[ⲁ ⲧⲉ] <text:line-break/><text:span text:style-name="T1"> </text:span><text:span text:style-name="T2">(14/11) </text:span> [ⲧⲉⲉⲓϩⲉ ⲡⲉⲛⲧ]ⲁⲥ̅ⲣ̅ⲙⲁ̣ⲉⲓⲛ̅ ⲙ̅ⲙⲉⲛ ⲁ̣[ⲣⲁϥ] <text:line-break/><text:span text:style-name="T1"> </text:span><text:span text:style-name="T2">(14/12) </text:span> [ϥⲁϫ]ⲱ̣ⲕ ⲁⲃⲁⲗ ϩ̅ⲛ̣̅̅ ⲧ̣[ⲉⲧⲁ]ϩ̅ⲣ̅ⲙ̣ⲁ̣ⲉⲓⲛ̣̅ [ⲁ]‐ <text:line-break/><text:span text:style-name="T1"> </text:span><text:span text:style-name="T2">(14/13) </text:span> [ⲣⲁϥ] ⲛ̅ⲥⲡⲉⲣⲙⲁ ⲇ[ⲉ ⲉⲧ]ϣ̣[ⲁ]ϫⲡ̣ [ⲛⲁ]ⲣ̣̅ⲁ̣[ⲛⲉ] <text:line-break/><text:span text:style-name="T1"> </text:span><text:span text:style-name="T2">(14/14) </text:span> [ⲭ]ⲉ̣ ϣⲁⲛⲧⲉⲡⲧⲏ̣[ⲣ]ϥ̣̅ ⲣ̅ⲉⲕ̣ⲕ̣ⲣⲓⲛⲉ ⲛ̣[ϥ̅]ϫ̣[ⲓ] <text:line-break/><text:span text:style-name="T1"> </text:span><text:span text:style-name="T2">(14/15) </text:span> [ⲙⲟ]ⲣⲫⲏ ⲁⲩⲱ ⲧⲉⲉ̣ⲓ̣ϩⲉⲉⲥ̣ ⲧⲁⲡⲟⲫⲁ̣ⲥ̣ⲓⲥ̣ <text:line-break/><text:span text:style-name="T1"> </text:span><text:span text:style-name="T2">(14/16) </text:span> [ⲛ]ⲁ̣ϫ̣ⲱⲕ ⲁⲃⲁⲗ· ⲛ̅ⲑ̣ⲉ ⲛ̅ⲅⲁⲣ ⲛ̅ⲧⲥϩⲓⲙⲉ <text:line-break/><text:span text:style-name="T1"> </text:span><text:span text:style-name="T2">(14/17) </text:span> [ⲧⲏ ⲉⲧ]ⲉ ϣⲁⲩⲧ̣ⲁⲉⲓⲁⲥ̣ ⲁϩⲣⲏⲓ̈ ⲁⲡⲙⲟⲩ̣ <text:line-break/><text:span text:style-name="T1"> </text:span><text:span text:style-name="T2">(14/18) </text:span> [ⲟⲩⲛ̅ⲧ]ⲉⲥ ⲙ̅ⲙ[ⲉⲩ] ⲙ̣̅ⲫⲏ̣ⲩ̣ ⲙ̅ⲡⲭⲣⲟⲛⲟⲥ <text:line-break/><text:span text:style-name="T1"> </text:span><text:span text:style-name="T2">(14/19) </text:span> [ⲥⲛⲁ]ⲙⲓⲥⲉ [ⲛ̅ϯϩⲉ] ⲁ̣ⲛ ⲧⲉ̣[ⲉⲓ] ⲛ̣̅ⲇⲉ ⲙⲓⲥⲉ <text:line-break/><text:span text:style-name="T1"> </text:span><text:span text:style-name="T2">(14/20) </text:span> [ⲥⲛⲁ]ϫⲓ ⲙ̣̅[ⲡⲉⲡⲗ]ⲁ̣ⲥⲙ̣[ⲁ ⲉ]ⲧ̣ⲏϣ ⲛⲉⲥ <text:line-break/><text:span text:style-name="T1"> </text:span><text:span text:style-name="T2">(14/21) </text:span> [ⲁⲩⲱ] ⲉⲥ̣[ⲛⲁⲣ̅ⲧⲉⲗⲉ]ⲓ̣ⲟ̣ⲥ ⲟ̣ⲩ̣ⲛⲧⲉ̅ϥ̅ ⲙ̅ⲙⲉⲩ <text:line-break/><text:span text:style-name="T1"> </text:span><text:span text:style-name="T2">(14/22) </text:span> [ⲛ̅ⲟⲩⲥ]ⲓⲁ [ⲛ̅ⲁⲧ]ⲫ̣ⲑ̣ⲟ̣ⲛ[ⲟ]ⲥ̣ [ⲉⲣ]ⲉ̣ⲡϣⲏⲣⲉ ⲙ̅‐ <text:line-break/><text:span text:style-name="T1"> </text:span><text:span text:style-name="T2">(14/23) </text:span> [ⲡⲛ]ⲟⲩⲧⲉ ϣⲟⲟⲡ ⲛ̅ϩ[ⲏⲧ̅ϥ̅ ϩⲟ]ⲧⲁⲛ ⲇⲉ <text:line-break/><text:soft-page-break/><text:span text:style-name="T1"> </text:span><text:span text:style-name="T2">(14/24) </text:span> [ⲉϥ]ϣⲁⲛ̣ϫⲡⲟ ⲛ̣̅ⲡⲧ̣ⲏ[ⲣ̅ϥ̅ ⲡ]ⲉ̣ⲧⲉ ⲟⲩⲛ‐ <text:line-break/><text:span text:style-name="T1"> </text:span><text:span text:style-name="T2">(14/25) </text:span> [5̅0̅ⲧ̅]̅ϥ̣̅̅50ⲃ ⲙ̅ⲙⲉⲩ ⲥⲉⲛⲁⲃ̣ⲁⲗ̣〈ϥ̅〉 ⲁⲃⲁⲗ ϩ̅ⲙ̅ ⲡ‐ <text:line-break/><text:span text:style-name="T1"> </text:span><text:span text:style-name="T2">(14/26) </text:span> ⲕ̣ⲱϩ̅ⲧ̅ ϫⲉ ⲁϥϣⲱⲥ ⲁ̣ⲡ̣ⲉϩⲟⲩⲟ ⲁϥ̅ⲣ̅‐ <text:line-break/><text:span text:style-name="T1"> </text:span><text:span text:style-name="T2">(14/27) </text:span> ϩⲩⲃⲣⲓⲍⲉ [1̅6vacat̅16] ⲛ̅ⲇ̣ⲉ ⲡⲉⲓⲱⲧ%6 ⲛ̅‐ <text:line-break/><text:span text:style-name="T1"> </text:span><text:span text:style-name="T2">(14/28) </text:span> ⲧ̣ⲁⲣⲟⲩⲧ̅ⲛ̅ⲛⲁⲩ ϭⲉ ⲙ̅ⲡⲛ̣[ⲁ]ϭ ⲛ̅ϣⲏⲣⲉ <text:line-break/><text:span text:style-name="T1"> </text:span><text:span text:style-name="T2">(14/29) </text:span> ⲛ̣̅ⲥⲁ ⲛⲉϥ̅ⲥⲛⲏⲩ ⲛ̅ⲕⲟ[ⲩ]ⲉⲓ ⲁϥⲡⲱⲣ̅ϣ̅ <text:line-break/><text:span text:style-name="T1"> </text:span><text:span text:style-name="T2">(14/30) </text:span> ⲁⲃⲁⲗ ⲙ̅ⲡⲇⲓⲁⲧⲁⲅⲙⲁ ⲙ̣̅ⲡ̣ⲓⲱⲧ ⲁϥⲱϣ <text:line-break/><text:span text:style-name="T1"> </text:span><text:span text:style-name="T2">(14/31) </text:span> ⲙ̅ⲙⲁϥ̅ ⲉϥϯ ⲁϩ̅ⲛ̅ ⲡⲧ̣[ⲏ]ⲣ̣̅ϥ̅ ⲁⲩⲱ ⲁϥ‐ <text:line-break/><text:span text:style-name="T1"> </text:span><text:span text:style-name="T2">(14/32) </text:span> ϥⲓ ⲙ̅ⲡϫⲉⲓⲣⲟⲅⲣⲁⲫⲟⲛ̣ ⲛ̣̅ⲉⲥ ⲡⲁⲧⲕⲁ‐ <text:line-break/><text:span text:style-name="T1"> </text:span><text:span text:style-name="T2">(14/33) </text:span> ⲧⲁⲇⲓⲕⲏ ⲡⲉⲉⲓ ⲛ̅ⲇⲉ ⲡ[ⲉ ⲡ]ⲇⲓⲁⲧⲁⲅⲙⲁ <text:line-break/><text:span text:style-name="T1"> </text:span><text:span text:style-name="T2">(14/34) </text:span> ⲉⲛⲉϥϣⲟⲟⲡ ⲡⲉ ⲛⲉ[ⲛ]ⲧ̣ⲁϩ̣ⲟⲩⲉⲉ̣ⲓ̣ⲧ̣ⲟⲩ <text:line-break/><text:span text:style-name="T1"> </text:span><text:span text:style-name="T2">(14/35) </text:span> ⲛ̅ϭⲁⲟⲩⲁⲛ ⲁϩⲟⲩϣ[ⲱ]ⲡ̣ⲉ ⲛ̅ⲕⲁⲧⲁⲇⲓ‐ <text:line-break/><text:span text:style-name="T1"> </text:span><text:span text:style-name="T2">(14/36) </text:span> ⲕⲟⲥ ϩ̅ⲛ̅ ⲁⲇⲁⲙ ⲁϩⲟⲩⲛ̣̅[ⲧ]ⲟ̣ⲩ ⲁⲃⲁⲗ ⲙ̅ⲡ‐ <text:line-break/><text:span text:style-name="T1"> </text:span><text:span text:style-name="T2">(14/37) </text:span> ⲙⲟⲩ ⲁϩⲟⲩϫⲓ ⲙ̅ⲡⲕⲱ̣[ⲉ] ⲁ̣ⲃⲁⲗ ⲛ̅ⲛⲟⲩ <text:line-break/><text:span text:style-name="T1"> </text:span><text:span text:style-name="T2">(14/38) </text:span> ⲛⲁⲃⲓ ⲁⲩⲱ ⲁϩⲟⲩⲥⲱ̣ⲧ̣ⲉ ⲙ̅ⲙⲁⲩ ϩⲓⲧ̅ⲛ̅ <text:line-break/><text:span text:style-name="T1"> </text:span><text:span text:style-name="T2">(15/8) </text:span> (Lines 1--8 lacking) <text:line-break/><text:span text:style-name="T1"> </text:span><text:span text:style-name="T2">(15/9) </text:span> [.....]..[...].[ <text:line-break/><text:span text:style-name="T1"> </text:span><text:span text:style-name="T2">(15/10) </text:span> [....]ⲁ̣ⲛ ⲉⲛ̅ⲙ̅ⲡ[ϣⲁ <text:line-break/><text:span text:style-name="T1"> </text:span><text:span text:style-name="T2">(15/11) </text:span> [.].ⲑ̣ⲟ̣ⲛ ⲙ̅ⲛ̅ ⲛⲉⲛ.[ <text:line-break/><text:span text:style-name="T1"> </text:span><text:span text:style-name="T2">(15/12) </text:span> [.]ⲥ̣ ⲉⲉⲓϫⲟⲩ ⲛ̅ⲇⲉ ⲙ̅[ⲙⲁϥ <text:line-break/><text:span text:style-name="T1"> </text:span><text:span text:style-name="T2">(15/13) </text:span> [..]ⲱ[.]ⲧ̣ⲟⲛ̣[..]ϩ.[ <text:line-break/><text:span text:style-name="T1"> </text:span><text:span text:style-name="T2">(15/14) </text:span> [..]ⲛ̣ ⲙ̣ⲛ̣̅ ⲛ[ⲉ]ⲉ̣ⲓ̣[ <text:line-break/><text:span text:style-name="T1"> </text:span><text:span text:style-name="T2">(15/15) </text:span> ⲙ̣̅[ⲡ]ϣⲁ ⲛ̅ⲅⲁⲣ ⲁ̣.[ <text:line-break/><text:span text:style-name="T1"> </text:span><text:span text:style-name="T2">(15/16) </text:span> ⲡ̣ⲛⲟⲩⲧⲉ ⲁⲩⲱ ⲡⲉ̣ⲓ̣[ⲱⲧ ⲡ]‐ <text:line-break/><text:span text:style-name="T1"> </text:span><text:span text:style-name="T2">(15/17) </text:span> ⲭⲣⲏⲥⲧⲟⲥ ⲁϥ̅ⲥⲉϩⲱϥ [ⲁⲃⲁⲗ ϩ̅ⲛ̅ ⲛⲉ]‐ <text:line-break/><text:span text:style-name="T1"> </text:span><text:span text:style-name="T2">(15/18) </text:span> ⲉⲓ ⲧⲏⲣⲟⲩ ⲉϥⲙⲁⲉ̣[ⲓⲉ ⲛ̅ⲛⲉϥⲙⲉⲗⲟⲥ] <text:line-break/><text:span text:style-name="T1"> </text:span><text:span text:style-name="T2">(15/19) </text:span> ϩ̅ⲙ̅ ⲡⲉϥϩⲏ̣ⲧ ⲧⲏ[ⲣ̅ϥ̅ ⲡⲉⲧⲣ̅ⲫⲑⲟⲛⲉⲓ ϯ] <text:line-break/><text:span text:style-name="T1"> </text:span><text:span text:style-name="T2">(15/20) </text:span> ⲛ̅ⲛⲉϥⲙⲉⲗⲟ̣ⲥ ⲟⲩⲃ̣[ⲉ ⲛⲉⲩⲉⲣⲏⲩ ⲉⲓϣ] <text:line-break/><text:span text:style-name="T1"> </text:span><text:span text:style-name="T2">(15/21) </text:span> ⲡⲉ ⲛ̅ϥ̅ⲣ̅ⲫⲑ̣[ⲟ]ⲛⲉⲓ [ⲉⲛ ⲛ̅ⲛⲉϥϣⲱⲡⲉ ⲉϥ]‐ <text:line-break/><text:span text:style-name="T1"> </text:span><text:span text:style-name="T2">(15/22) </text:span> ⲥⲉϩⲏⲩ ⲁⲃⲁ̣ⲗ ⲛ̅ⲕ[ⲉⲙⲉⲗⲟⲥ ⲙ̅ⲛ̅ ⲡⲓⲁ]‐ <text:line-break/><text:span text:style-name="T1"> </text:span><text:span text:style-name="T2">(15/23) </text:span> ⲅⲁⲑⲟⲛ ⲉ5̅0̅ⲧ̣̅̅[̅ϥ̅50]ⲛⲉⲩ ⲁⲣⲁ̅ϥ̅ [ⲉⲩ]ⲛ̣[ⲧⲉϥ ⲛ̅ⲟⲩ]‐ <text:line-break/><text:span text:style-name="T1"> </text:span><text:span text:style-name="T2">(15/24) </text:span> ⲥⲁⲛ ⲙ̅ⲙⲉ̣ⲩ̣ [ⲉϥ]ⲱⲡ ⲙ̅ⲙⲁⲛ [ϩⲱⲥ ⲛ̅ⲧⲁϥ] <text:line-break/><text:span text:style-name="T1"> </text:span><text:span text:style-name="T2">(15/25) </text:span> ϩⲱⲱϥ̅ ⲡⲉ ⲉϥϯ ⲉⲁⲩ ⲙ̅ⲡ[ⲏ ⲉϯ ⲛⲉⲛ] <text:line-break/><text:span text:style-name="T1"> </text:span><text:span text:style-name="T2">(15/26) </text:span> ⲛ̅ⲧⲭⲁⲣⲓⲥ· ⲥϣⲉ ϭⲉ ⲁⲡⲟ[ⲩ ⲉ]ⲉⲓ ⲡ[ⲟ]ⲩ̣‐ <text:line-break/><text:span text:style-name="T1"> </text:span><text:span text:style-name="T2">(15/27) </text:span> ⲉⲉⲓ ⲙ̅ⲙⲁⲛ ⲁⲧⲣⲉϥ̅ⲣ̅ⲁⲡⲟ̣ⲗ̣[ⲁⲩ]ⲉ ⲛ̅ⲧⲇ[ⲱ]‐ <text:line-break/><text:span text:style-name="T1"> </text:span><text:span text:style-name="T2">(15/28) </text:span> ⲣⲉⲁ ⲉⲛⲧⲁϥ̅ϫⲓⲧ̅ⲥ̅ ⲛ̅ⲧ̅ⲙ̅ ⲡ̣[ⲛⲟⲩⲧ]ⲉ̣ ⲁ̣[ⲩ]‐ <text:line-break/><text:span text:style-name="T1"> </text:span><text:span text:style-name="T2">(15/29) </text:span> ⲱ ⲛ̅ⲧ̅ⲛ̅ⲧ̅ⲙ̅ⲣ̅ⲫⲑⲟⲛⲉⲓ ⲉⲛⲥⲁⲩ̣ⲛⲉ ϫ̣[ⲉ] <text:line-break/><text:span text:style-name="T1"> </text:span><text:span text:style-name="T2">(15/30) </text:span> ⲡⲉⲧ̅ⲣ̅ⲫⲑⲟⲛⲉⲓ ⲟⲩϫⲣⲁⲡ ⲡⲉ ⲙ̅ⲡⲉϥϩ̣ⲓ̣‐ <text:line-break/><text:span text:style-name="T1"> </text:span><text:span text:style-name="T2">(15/31) </text:span> ⲏ ⲉϥϣⲁⲣϣ̅ⲣ̅ ⲙ̅ⲙⲁϥ ⲟⲩⲁⲉⲉⲧ̅ϥ̅ <text:line-break/><text:span text:style-name="T1"> </text:span><text:span text:style-name="T2">(15/32) </text:span> ϩ̅ⲙ̅ ⲡⲉϩⲙⲁⲧ ⲁⲩⲱ ⲉϥⲟⲉⲓ ⲛ̅ⲁⲧϩⲏ̣[ⲧ] <text:line-break/><text:span text:style-name="T1"> </text:span><text:span text:style-name="T2">(15/33) </text:span> ⲙ̅ⲡⲛⲟⲩⲧⲉ ⲥϣⲉ ⲁⲣⲁϥ ⲁⲣⲉϣⲉ̣ [ⲛ̅ϥ̅]‐ <text:line-break/><text:span text:style-name="T1"> </text:span><text:span text:style-name="T2">(15/34) </text:span> ⲧⲉ̣[ⲗ]ⲏⲗ ⲛ̅ϥ̅ϫⲓ ⲁⲃⲁⲗ ϩ̅ⲛ̅ ⲧⲭⲁⲣⲓⲥ ⲙⲛ̣̅ <text:line-break/><text:span text:style-name="T1"> </text:span><text:span text:style-name="T2">(15/35) </text:span> ⲧⲇⲱⲣⲉⲁ· ⲟⲩⲛⲧⲉ ⲟⲩⲉⲉⲓ ⲟⲩϩⲙⲁⲧ ⲛ̅‐ <text:line-break/><text:span text:style-name="T1"> </text:span><text:span text:style-name="T2">(15/36) </text:span> ⲡⲣⲟⲫⲏⲧⲓⲕⲟⲛ ⲉⲣⲓⲙⲉⲧⲉⲭⲉ ⲁⲣⲁϥ ⲟⲩ‐ <text:line-break/><text:span text:style-name="T1"> </text:span><text:span text:style-name="T2">(15/37) </text:span> ϣⲛ̅ ⲣ̅ϩⲏⲧⲥⲛⲉⲩ ⲙ̅ⲡ̅ⲣ̅ϯ ⲡⲉⲕⲟⲩⲁⲉⲓ‐ <text:line-break/><text:span text:style-name="T1"> </text:span><text:span text:style-name="T2">(15/38) </text:span> ⲉ ⲁⲡⲉⲕⲥⲁⲛ ϩ̅ⲛ̅ ⲟⲩⲫⲑⲟⲛⲟⲥ ⲟⲩⲧⲉ ⲙ̅ <text:line-break/><text:span text:style-name="T1"> </text:span><text:span text:style-name="T2">(16/8) </text:span> (Lines 1--8 lacking) <text:line-break/><text:soft-page-break/><text:span text:style-name="T1"> </text:span><text:span text:style-name="T2">(16/9) </text:span> [ 9+- ⲥⲁ]ⲧⲡ ⲉⲩ̣ⲟⲩ.[ <text:line-break/><text:span text:style-name="T1"> </text:span><text:span text:style-name="T2">(16/10) </text:span> [ 8+- ϣ]ⲟⲩⲉⲓⲧ ⲉⲩⲣ̅ⲃ[ⲁⲗ <text:line-break/><text:span text:style-name="T1"> </text:span><text:span text:style-name="T2">(16/11) </text:span> [ 9+- ]ϩⲏⲩ ⲁⲃⲁⲗ ⲛ̅ⲧⲉⲩ[ <text:line-break/><text:span text:style-name="T1"> </text:span><text:span text:style-name="T2">(16/12) </text:span> [ 9+- ]ⲟ̣ⲉⲓ ⲛ̣̅[ⲁ]ⲧ̣ⲥⲁⲩⲛⲉ ϫ[ⲉ] <text:line-break/><text:span text:style-name="T1"> </text:span><text:span text:style-name="T2">(16/13) </text:span> [ 12+- ]ⲙ̣̅[ⲡⲉ]ⲉⲓⲣ̣[ⲏⲧ]ⲉ ⲁϩ[ⲟⲩ] <text:line-break/><text:span text:style-name="T1"> </text:span><text:span text:style-name="T2">(16/14) </text:span> [ 11+- ]ⲉ̣ ⲙ̅ⲙ̣ⲁⲩ ⲛ̅ϩ[ⲣⲏⲓ̈ ⲛ̅] <text:line-break/><text:span text:style-name="T1"> </text:span><text:span text:style-name="T2">(16/15) </text:span> [ϩⲏⲧ%1 9+- ]ⲁⲛ ϫⲉⲕⲁⲥⲉ ⲉ̣ⲩ̣ⲛⲁ̣‐ <text:line-break/><text:span text:style-name="T1"> </text:span><text:span text:style-name="T2">(16/16) </text:span> [ⲙ̅ⲕ̅ⲙⲟⲩⲕⲟ]ⲩ̣ [ⲛ̅]ⲃⲓ̣ⲁ̣ ⲉⲧⲃⲉ ⲛⲉⲧⲕⲟⲩⲁ̣‐ <text:line-break/><text:span text:style-name="T1"> </text:span><text:span text:style-name="T2">(16/17) </text:span> [ϣⲟⲩ ⲁⲙⲉ]ⲩ̣ⲉ ⲉⲧⲃⲏⲧⲟⲩ ⲉⲣⲉϣⲁⲛⲉ̣‐ <text:line-break/><text:span text:style-name="T1"> </text:span><text:span text:style-name="T2">(16/18) </text:span> [ⲉⲓ ⲙⲁⲕⲙⲉⲕ ⲁϩⲟ]ⲩⲛ ⲁⲣⲁⲕ· ⲡⲉⲕⲥⲁⲛ <text:line-break/><text:span text:style-name="T1"> </text:span><text:span text:style-name="T2">(16/19) </text:span> [ⲛ̅ⲇⲉ ⲟⲩⲛ̅ⲧⲉϥ ⲁⲛ] ⲙ̅ⲙⲉⲩ ⲛ̅ⲧⲉⲭⲁⲣⲓⲥ <text:line-break/><text:span text:style-name="T1"> </text:span><text:span text:style-name="T2">(16/20) </text:span> [ⲛ̅ⲧⲉ ⲡⲏ ⲙ̅ⲡⲣ̅ϭ]ⲱ̣ϫϥ̅ ⲙ̅ⲙⲁⲕ· ⲁⲗⲗⲁ <text:line-break/><text:span text:style-name="T1"> </text:span><text:span text:style-name="T2">(16/21) </text:span> [ⲧⲉⲗⲏⲗ ⲛ̅ⲕ̅ϣⲱⲡ ϩ]ⲙⲁⲧ̣ ⲙ̅ⲡⲛⲉⲩⲙⲁ‐ <text:line-break/><text:span text:style-name="T1"> </text:span><text:span text:style-name="T2">(16/22) </text:span> [ⲧⲓⲕⲱⲥ ⲛ̅ⲕ̅ⲉⲓ]ⲣ̣ⲉ̣ ⲡ̣ϣ[ⲗ]ⲏⲗ ϩⲁ ⲡⲉⲧⲙ̅‐ <text:line-break/><text:span text:style-name="T1"> </text:span><text:span text:style-name="T2">(16/23) </text:span> [ⲙⲉⲩ ϫⲉ]ⲕ̣ⲁ̣ⲥ̣ⲉ̣ ⲉⲕⲛⲁⲙⲉ̣[ⲧ]ⲉⲭ̣ⲉ ⲁⲧⲭⲁⲣ[ⲓⲥ] <text:line-break/><text:span text:style-name="T1"> </text:span><text:span text:style-name="T2">(16/24) </text:span> [ⲉⲧϣⲟⲟ]ⲡ̣ ⲛ̅ϩⲣⲏⲓ̈ ⲛϩ̣ⲏ̣ⲧ̅ϥ̅ ⲙ̅ⲡ̅ⲣ̅ⲁⲡ[ϥ̅] <text:line-break/><text:span text:style-name="T1"> </text:span><text:span text:style-name="T2">(16/25) </text:span> [ϭⲉ ⲉ]ⲩ̣ⲁ̣[ⲗ]ⲗ̣ⲟⲧⲣⲓⲟⲛ ⲁⲣⲁⲕ ⲡⲉ ⲁⲗⲗⲁ ⲡⲉ‐ <text:line-break/><text:span text:style-name="T1"> </text:span><text:span text:style-name="T2">(16/26) </text:span> [ⲧ]ⲉ̣ ⲡⲱⲕ̣ ⲡ̣ⲉ ⲡⲉⲉⲓ ⲛ̅ⲧⲁϩⲁⲡⲟⲩⲉⲉⲓ <text:line-break/><text:span text:style-name="T1"> </text:span><text:span text:style-name="T2">(16/27) </text:span> [ⲡ]ⲟ̣ⲩⲉⲉ̣[ⲓ ⲛ̅]ⲛ̅ⲕ̅ϣ̅〈ⲃ〉ⲣ̅ⲙⲉⲗⲟⲥ ϫⲓⲧ̅ϥ̅ ⲉⲕ‐ <text:line-break/><text:span text:style-name="T1"> </text:span><text:span text:style-name="T2">(16/28) </text:span> [ⲛⲁ]ⲙ̣ⲁ̣[ⲉ]ⲓ̣ⲉ̣ ⲧⲁⲡⲉ ⲉⲧⲉ ⲟⲩⲛⲧⲉⲥ ⲛⲏ ⲟⲩⲛ‐ <text:line-break/><text:span text:style-name="T1"> </text:span><text:span text:style-name="T2">(16/29) </text:span> [ⲧ]ⲉ̣ⲕⲥ ϩⲱⲱⲕ· ⲧⲉⲉⲓ 〈ⲉⲧⲉ〉 ⲁⲃⲁⲗ ⲛ̅ϩⲏⲧ〈ⲥ̅〉 ⲉⲣⲉ‐ <text:line-break/><text:span text:style-name="T1"> </text:span><text:span text:style-name="T2">(16/30) </text:span> ⲛ̣ⲉⲉⲓⲁⲡⲟϩⲣⲟⲓⲁ ⲛ̅ⲛⲉϩⲙⲁⲧ ϣⲟ‐ <text:line-break/><text:span text:style-name="T1"> </text:span><text:span text:style-name="T2">(16/31) </text:span> [ⲟ]ⲡ̣ ϩ̅ⲛ̅ ⲛⲉⲕⲥⲛⲏⲩ· ⲁⲗⲗⲁ ⲟⲩⲛ ⲟⲩⲉ‐ <text:line-break/><text:span text:style-name="T1"> </text:span><text:span text:style-name="T2">(16/32) </text:span> [ⲉⲓ 5̅0̅ⲣ̅50]ⲡ̣ⲣⲟⲕⲟⲡⲧⲉ ϩ̅ⲙ̅ ⲡⲗⲟⲅⲟⲥ ⲙ̅ⲡ̅ⲣ̅‐ <text:line-break/><text:span text:style-name="T1"> </text:span><text:span text:style-name="T2">(16/33) </text:span> ϫ̣ⲓ̣ ϫⲣⲁⲡ ϩ̅ⲙ̅ ⲡⲉⲉⲓ ⲙ̅ⲡⲣ̅ϫⲟⲟϥ ϫ̣ⲉ <text:line-break/><text:span text:style-name="T1"> </text:span><text:span text:style-name="T2">(16/34) </text:span> ⲉⲧⲃⲉ ⲉⲩ ⲡⲉⲉⲓ ⲙ̅ⲙⲉⲛ ϣⲉϫⲉ ⲁⲛⲁⲕ <text:line-break/><text:span text:style-name="T1"> </text:span><text:span text:style-name="T2">(16/35) </text:span> ⲛ̅ⲇⲉ ⲛ̅ϯϣⲉϫⲉ ⲉⲛ ⲡⲉⲧⲉ ⲡⲉⲉⲓ ⲛ̅ <text:line-break/><text:span text:style-name="T1"> </text:span><text:span text:style-name="T2">(16/36) </text:span> ⲅⲁⲣ ϫⲟⲩ ⲙ̅ⲙⲁϥ ⲟⲩⲡⲉⲧⲉ ⲡⲱⲕ ⲡⲉ <text:line-break/><text:span text:style-name="T1"> </text:span><text:span text:style-name="T2">(16/37) </text:span> ⲁⲩⲱ ⲡⲉⲧⲣ̅ⲛⲟⲉⲓ ⲙ̅ⲡⲗⲟⲅⲟⲥ ⲙ̅ⲛ̅ <text:line-break/><text:span text:style-name="T1"> </text:span><text:span text:style-name="T2">(16/38) </text:span> ⲡⲉⲧϣⲉϫⲉ ϯϭⲁⲙ ⲛ̅ⲟⲩⲱⲧ ⲧⲉ ⲡⲗⲟ‐ <text:line-break/><text:span text:style-name="T1"> </text:span><text:span text:style-name="T2">(17/1) </text:span> [ⲅⲟⲥ <text:line-break/><text:span text:style-name="T1"> </text:span><text:span text:style-name="T2">(17/10) </text:span> (Lines 1--10 lacking) <text:line-break/><text:span text:style-name="T1"> </text:span><text:span text:style-name="T2">(17/11) </text:span> [.].[ <text:line-break/><text:span text:style-name="T1"> </text:span><text:span text:style-name="T2">(17/12) </text:span> [..]ⲥⲉ̣[ <text:line-break/><text:span text:style-name="T1"> </text:span><text:span text:style-name="T2">(17/13) </text:span> [.].ⲁ[..].[ <text:line-break/><text:span text:style-name="T1"> </text:span><text:span text:style-name="T2">(17/14) </text:span> [ⲃⲉ]ⲗ ⲏ̣ ⲛ̣̅ⲟⲩ[ϭⲓ]ϫ̣ [ⲟⲩⲁⲉⲉⲧⲟⲩ ⲉⲩϣⲟ]‐ <text:line-break/><text:span text:style-name="T1"> </text:span><text:span text:style-name="T2">(17/15) </text:span> ⲟ̣ⲡ̣ ⲛ̅ⲟⲩⲥⲱⲙⲁ ⲛ̣̅[ⲟⲩⲱⲧ ⲛⲉⲧⲉ ⲛⲱⲛ ⲛⲉ]‐ <text:line-break/><text:span text:style-name="T1"> </text:span><text:span text:style-name="T2">(17/16) </text:span> ⲧⲏⲣ̅ⲛ̅ ⲉⲩⲣ̅ⲇⲓⲁⲕⲟ̣[ⲛⲉⲓ ⲛ̅ⲧⲁⲡⲉ ϩⲓⲟⲩⲥⲁⲡ] <text:line-break/><text:span text:style-name="T1"> </text:span><text:span text:style-name="T2">(17/17) </text:span> ⲡⲟⲩⲉⲉⲓ ⲡⲟⲩⲉⲉⲓ ⲛ̣̅[ⲇⲉ ⲙ̅ⲙⲉⲗⲟⲥ ⲉϥⲱⲡ] <text:line-break/><text:span text:style-name="T1"> </text:span><text:span text:style-name="T2">(17/18) </text:span> ⲙ̅ⲙⲁⲥ ⲙ̅ⲙⲉⲗⲟⲥ ⲙ̅ⲛ̣̅̅[ϣϭⲁⲙ ⲙ̅ⲙⲁⲩ] <text:line-break/><text:span text:style-name="T1"> </text:span><text:span text:style-name="T2">(17/19) </text:span> ⲧⲏⲣⲟⲩ ⲁϣⲱⲡⲉ [ⲙ̅ⲡⲧⲏⲣ̅ϥ̅ ⲛ̅ⲟⲩⲣⲓⲧⲉ] <text:line-break/><text:span text:style-name="T1"> </text:span><text:span text:style-name="T2">(17/20) </text:span> ⲏ ⲡⲧⲏⲣ̅ϥ̅ ⲛ̅ⲃⲉⲗ·[ⲏ ⲡⲧⲏⲣ̅ϥ̅ ⲛ̅ϭⲓϫ ⲉⲣⲉ] <text:line-break/><text:span text:style-name="T1"> </text:span><text:span text:style-name="T2">(17/21) </text:span> ⲛⲉⲉⲓⲙⲉⲗⲟⲥ ⲛ̅ⲛⲟ̣[ⲩⲱⲱⲛ̅ϩ̅ ⲟⲩⲁⲉⲉⲧⲟⲩ] <text:line-break/><text:span text:style-name="T1"> </text:span><text:span text:style-name="T2">(17/22) </text:span> ⲁⲗⲗⲁ ⲥⲉⲙⲁⲩⲧ%6 ⲧ̅ⲛ̣̅̅[ⲥⲁⲩⲛⲉ ϫⲉ ⲥⲉⲙⲟⲩ]‐ <text:line-break/><text:span text:style-name="T1"> </text:span><text:span text:style-name="T2">(17/23) </text:span> ⲟⲩⲧ ⲙ̅ⲙⲁⲩ ⲉⲧⲃⲉ ⲉⲩ ⲛ̅[ⲇⲉ ⲉⲕⲙⲁⲉⲓⲉ] <text:line-break/><text:span text:style-name="T1"> </text:span><text:span text:style-name="T2">(17/24) </text:span> ⲛ̅ⲙ̅ⲙⲉⲗ̣[ⲟⲥ] ⲉⲧⲙⲁⲩⲧ ⲁⲛ ⲁ̣[ⲡⲙⲁ ⲛ̅ⲛⲉⲧⲁ]‐ <text:line-break/><text:span text:style-name="T1"> </text:span><text:span text:style-name="T2">(17/25) </text:span> ⲁⲛ̅ϩ̅ ⲛⲉϣ ⲛ̅ϩⲉ ⲉⲕⲥⲁⲩⲛ̣[ⲉ ϫⲉ ⲟⲩⲉⲉⲓ] <text:line-break/><text:soft-page-break/><text:span text:style-name="T1"> </text:span><text:span text:style-name="T2">(17/26) </text:span> ⲡⲉⲧⲟⲉⲓ ⲛ̅ⲁⲧⲥⲁⲩⲛⲉ ⲁⲛⲉⲥⲛ̣[ⲏⲩ ⲉⲕⲟ]‐ <text:line-break/><text:span text:style-name="T1"> </text:span><text:span text:style-name="T2">(17/27) </text:span> ⲉⲓ ⲛ̅ⲅⲁⲣ ⲛ̅ⲁⲧⲥⲁⲩⲛⲉ ⲉⲕⲙ̣ⲁ̣[ⲥⲧⲉ ⲙ̅ⲙⲁⲩ] <text:line-break/><text:span text:style-name="T1"> </text:span><text:span text:style-name="T2">(17/28) </text:span> ⲁⲩⲱ ⲉⲕ̅ⲣ̅ⲫⲑⲟⲛⲉⲓ ⲁⲣⲁⲩ ⲉ̣[ⲕⲛⲁϫⲓ ⲉⲛ] <text:line-break/><text:span text:style-name="T1"> </text:span><text:span text:style-name="T2">(17/29) </text:span> ⲛ̅ⲧⲭⲁⲣⲓⲥ ⲉⲧϣⲟⲟⲡ ⲛ̅ϩⲣⲏⲓ%9 ⲛ̣̅[ϩⲏⲧⲟⲩ] <text:line-break/><text:span text:style-name="T1"> </text:span><text:span text:style-name="T2">(17/30) </text:span> ⲉⲛⲕⲟⲩⲱϣⲉ ⲉⲛ ⲁϩⲱⲧ̅ϥ̅ ⲙ̅ⲙⲁⲩ ⲁ̣[ⲧ]‐ <text:line-break/><text:span text:style-name="T1"> </text:span><text:span text:style-name="T2">(17/31) </text:span> ⲇⲱⲣⲉⲁ ⲛ̅ⲧⲁⲡⲉ ⲉⲥϣⲉ ⲁⲣⲁⲕ ⲁ[5̅0̅ϣ̅]̅ⲡ̣̅̅50 <text:line-break/><text:span text:style-name="T1"> </text:span><text:span text:style-name="T2">(17/32) </text:span> ϩⲙⲁⲧ ϩⲁ ⲛⲙ̅ⲙⲉⲗⲟⲥ ⲁⲩⲱ ⲛ̅ⲕ̣̅̅[ⲣ̅ⲁⲓ] <text:line-break/><text:span text:style-name="T1"> </text:span><text:span text:style-name="T2">(17/33) </text:span> ⲧⲉⲓ ϫⲉⲕⲁⲥⲉ ⲉⲩⲛⲁⲧ̅ⲛ̅ ⲛⲉⲕ ϩⲱ[ⲱⲕ] <text:line-break/><text:span text:style-name="T1"> </text:span><text:span text:style-name="T2">(17/34) </text:span> ⲛ̅ⲧ̣ⲭⲁⲣⲓⲥ ⲧⲉⲛⲧⲁϩⲟⲩⲧⲉⲉⲓⲥ ⲛ̅ⲛ̣ⲏ̣‐ <text:line-break/><text:span text:style-name="T1"> </text:span><text:span text:style-name="T2">(17/35) </text:span> ⲟⲩⲣ̅ⲙ̅ⲙⲁⲟ ⲛ̅ⲅⲁⲣ ⲡⲉ ⲡⲗⲟⲅⲟⲥ ⲛ̅ⲁⲧ‐ <text:line-break/><text:span text:style-name="T1"> </text:span><text:span text:style-name="T2">(17/36) </text:span> ⲣ̅ⲫⲑⲟⲛⲉⲓ ⲁⲩⲱ ⲟⲩⲭⲣⲏⲥⲧⲟⲥ ⲡⲉ ϥ̅‐ <text:line-break/><text:span text:style-name="T1"> </text:span><text:span text:style-name="T2">(17/37) </text:span> ϯ ⲁⲃⲁⲗ ϩ̅ⲛ̅ ⲛⲉⲓⲙⲁ ⲛ̅ⲛ̅ⲇⲱⲣⲉⲁ ⲛ̅‐ <text:line-break/><text:span text:style-name="T1"> </text:span><text:span text:style-name="T2">(17/38) </text:span> ⲛ̅ϥ̅ⲣⲱⲙⲉ ⲁϫⲛ̅ ⲣ̅ⲫⲑⲟⲛⲉⲓ ⲕⲁⲧⲁ <text:line-break/><text:span text:style-name="T1"> </text:span><text:span text:style-name="T2">(18/10) </text:span> (Lines 1--10 lacking) <text:line-break/><text:span text:style-name="T1"> </text:span><text:span text:style-name="T2">(18/11) </text:span> [ 19+- ]ϩ[ <text:line-break/><text:span text:style-name="T1"> </text:span><text:span text:style-name="T2">(18/12) </text:span> [ 10+- ⲟⲩⲱ]ⲛ̣ϩ̣̅ [ⲁ]ⲃ̣ⲁ̣ⲗ ϩ̣[ⲣⲏⲓ̈] <text:line-break/><text:span text:style-name="T1"> </text:span><text:span text:style-name="T2">(18/13) </text:span> [ϩ̅ⲙ̅ ⲡⲟⲩⲉⲉⲓ ⲡⲟⲩⲉ]ⲉⲓ ⲛ̣̅ⲙ̅ⲙⲉⲗ[ⲟⲥ] <text:line-break/><text:span text:style-name="T1"> </text:span><text:span text:style-name="T2">(18/14) </text:span> [ 10+- ⲙ̅]ⲙⲓⲛ ⲙ̅ⲙⲁϥ ⲁⲩ <text:line-break/><text:span text:style-name="T1"> </text:span><text:span text:style-name="T2">(18/15) </text:span> [ 10+- ] ⲉⲛⲥⲉⲙⲓϣⲉ ⲉⲛ‐ <text:line-break/><text:span text:style-name="T1"> </text:span><text:span text:style-name="T2">(18/16) </text:span> [ⲣⲱ ⲙ̅ⲛ̅ ⲛⲉⲩⲉⲣⲏ]ⲩ̣ ⲉⲧⲃⲉ ⲡϣ̅ϥ̅ⲉⲓⲉ ⲙ̅‐ <text:line-break/><text:span text:style-name="T1"> </text:span><text:span text:style-name="T2">(18/17) </text:span> [ⲡⲉⲩⲉⲣⲏⲩ ⲁⲗⲗ]ⲁ̣ ⲉⲩϣ̅ⲡ̅ ϩⲓⲥⲉ ⲙ̅ⲛ̅ <text:line-break/><text:span text:style-name="T1"> </text:span><text:span text:style-name="T2">(18/18) </text:span> [ⲛⲉⲩⲉⲣⲏⲩ ⲉⲩⲛⲁⲣ̅]ϩⲱϥ ⲙ̅ⲛ̅ ⲛⲉⲩⲉⲣⲏⲩ <text:line-break/><text:span text:style-name="T1"> </text:span><text:span text:style-name="T2">(18/19) </text:span> [ⲁⲩⲱ ⲉⲓϣⲡⲉ ⲟ]ⲩⲛ ⲟⲩⲉⲉⲓ ⲙ̅ⲙⲁⲩ <text:line-break/><text:span text:style-name="T1"> </text:span><text:span text:style-name="T2">(18/20) </text:span> [ϣⲱⲛⲉ ⲉⲩⲛⲁϣ]ⲱ̣ⲛⲉ ⲛ̅ⲙ̅ⲙⲉϥ ⲁⲩⲱ <text:line-break/><text:span text:style-name="T1"> </text:span><text:span text:style-name="T2">(18/21) </text:span> [ⲉⲣⲉⲡⲟⲩⲉⲉⲓ ⲡⲟⲩⲉ]ⲉⲓ ⲟⲩⲁϫ ⲥⲉⲟⲩⲁϫ‐ <text:line-break/><text:span text:style-name="T1"> </text:span><text:span text:style-name="T2">(18/22) </text:span> [ϩⲓ ⲟⲩⲥⲁ]ⲡ̣ [ⲉⲓ]ϣⲡⲉ ⲛⲉ̣ⲩ̣ⲁϩⲉ ϭⲉ ⲁ‐ <text:line-break/><text:span text:style-name="T1"> </text:span><text:span text:style-name="T2">(18/23) </text:span> [ⲧϭⲓⲛ̅ⲉⲓ ⲁ]ⲃⲁⲗ ϩ̅ⲛ̅ ⲑⲁⲣ̣[ⲙ]ⲟⲛⲓⲁ ⲉⲩⲁ‐ <text:line-break/><text:span text:style-name="T1"> </text:span><text:span text:style-name="T2">(18/24) </text:span> [ⲉⲓ ⲁⲡⲓⲁⲓ]ⲱⲛ ⲉⲓⲧⲉ ⲥⲉϫⲁⲁⲛ̅ⲧ̅ ⲛ̅ϫⲓ <text:line-break/><text:span text:style-name="T1"> </text:span><text:span text:style-name="T2">(18/25) </text:span> [ⲁⲃⲁⲗ ⲛ̅]ⲧ̣ⲥⲩⲙⲫⲱⲛⲓⲁ ⲡⲟⲥⲱ ⲛ̅ϩⲟⲩ‐ <text:line-break/><text:span text:style-name="T1"> </text:span><text:span text:style-name="T2">(18/26) </text:span> [ⲟ ⲛⲉⲧ]ϣ̣ⲟⲟⲡ ⲁⲃⲁⲗ ϩ̅ⲛ̅ ⲧⲙ̅ⲛ̅ⲧⲟⲩⲉⲉⲓ <text:line-break/><text:span text:style-name="T1"> </text:span><text:span text:style-name="T2">(18/27) </text:span> [ⲛ̅ⲟⲩⲱⲧ] ⲥⲉⲏⲡ ⲁϩⲱⲧ̅ϥ̅ ⲁⲛⲉⲩⲉ‐ <text:line-break/><text:span text:style-name="T1"> </text:span><text:span text:style-name="T2">(18/28) </text:span> [ⲣⲏⲩ] ⲙ̣̅ⲡⲱⲣ ⲁⲣ̅ⲉⲛⲕⲁⲗⲉⲓ ⲛ̅ⲧⲉⲕⲁ <text:line-break/><text:span text:style-name="T1"> </text:span><text:span text:style-name="T2">(18/29) </text:span> ⲡ̣ⲉ ϫⲉ ⲙ̅ⲡⲥ̅ⲕⲱⲉ ⲙ̅ⲙⲁⲕ ⲛ̅ⲃⲉⲗ ⲁⲗ‐ <text:line-break/><text:span text:style-name="T1"> </text:span><text:span text:style-name="T2">(18/30) </text:span> ⲗ̣ⲁ̣ ⲛ̅ⲧⲁⲥⲕⲁⲁⲕ ⲛ̅ⲧⲏⲃⲉ ⲟⲩⲧⲉ ⲙ̅ⲡⲣ̅‐ <text:line-break/><text:span text:style-name="T1"> </text:span><text:span text:style-name="T2">(18/31) </text:span> [ⲣ̅]ⲫ̣ⲑⲟⲛⲉⲓ ⲁⲡⲉⲛⲧⲁⲩⲕⲁⲁϥ̅ ϩ̅ⲛ̅ ⲟⲩ‐ <text:line-break/><text:span text:style-name="T1"> </text:span><text:span text:style-name="T2">(18/32) </text:span> [ⲙⲉ]ⲣ̣ⲟⲥ ⲛ̅ⲃⲉⲗ ⲏ ⲟⲩϭⲓϫ ⲏ ⲟⲩⲣⲓⲧⲉ <text:line-break/><text:span text:style-name="T1"> </text:span><text:span text:style-name="T2">(18/33) </text:span> ϣⲱⲡ ϩⲙⲁⲧ ⲛ̅ⲇⲉ ϫⲉ ⲛ̅ⲕϣⲟ[ⲟ]ⲡ̣ <text:line-break/><text:span text:style-name="T1"> </text:span><text:span text:style-name="T2">(18/34) </text:span> ⲉⲛ ⲙ̅ⲡⲃⲁⲗ ⲙ̅ⲡⲥⲱⲙⲁ ⲁⲗⲗⲁ ⲟⲩⲛⲧⲉⲕ <text:line-break/><text:span text:style-name="T1"> </text:span><text:span text:style-name="T2">(18/35) </text:span> ⲙ̅ⲙⲉⲩ ⲛ̅ϯⲁⲡⲉ ⲛ̅ⲟⲩⲱⲧ ⲧⲉⲉⲓ ⲉⲧ‐ <text:line-break/><text:span text:style-name="T1"> </text:span><text:span text:style-name="T2">(18/36) </text:span> ⲃⲏⲧ̅ⲥ̅ ⲉⲣⲉⲡⲃⲉⲗ ϣⲟⲟⲡ ⲙ̅ⲛ̅ ⲧϭⲓϫ <text:line-break/><text:span text:style-name="T1"> </text:span><text:span text:style-name="T2">(18/37) </text:span> ⲙ̅ⲛ̅ ⲧⲟⲩⲣⲓⲧⲉ ⲙ̅ⲛ̅ ⲡⲕⲉⲥⲉⲡⲉ ⲙ̅‐ <text:line-break/><text:span text:style-name="T1"> </text:span><text:span text:style-name="T2">(18/38) </text:span> ⲙⲉⲣⲟⲥ ⲉⲧⲃⲉ ⲉⲩ ⲉⲕⲙⲁⲥⲧⲉ ⲙ̅‐ <text:line-break/><text:span text:style-name="T1"> </text:span><text:span text:style-name="T2">(19/1) </text:span> ⲡ̣ⲉⲛⲧⲁⲩⲕⲁⲁϥ̅ ⲛ̣̅[ ⲛ̅]‐ <text:line-break/><text:span text:style-name="T1"> </text:span><text:span text:style-name="T2">(19/2) </text:span> ⲧ̣ⲁⲥⲟⲩⲱϣⲉ ⲛ̅.[ <text:line-break/><text:span text:style-name="T1"> </text:span><text:span text:style-name="T2">(19/3) </text:span> ⲕ̣̅̅ⲣ̅ⲕⲁⲧⲁⲗⲁⲗⲉⲓ ⲙ̣̅[ <text:line-break/><text:span text:style-name="T1"> </text:span><text:span text:style-name="T2">(19/4) </text:span> ⲱⲗⲙ̅ ⲉⲛ ⲙ̅ⲙⲁ̣[ <text:line-break/><text:span text:style-name="T1"> </text:span><text:span text:style-name="T2">(19/5) </text:span> [ⲥⲱ]ⲙⲁ ⲛ̅ⲁⲧⲧⲱϩ̣[ <text:line-break/><text:soft-page-break/><text:span text:style-name="T1"> </text:span><text:span text:style-name="T2">(19/6) </text:span> [...].[.]ⲥ̣ⲁ̣ⲧ̅ⲡ̅[ <text:line-break/><text:span text:style-name="T1"> </text:span><text:span text:style-name="T2">(19/7) </text:span> [ 6+- ]ⲛ̣̅.[ <text:line-break/><text:span text:style-name="T1"> </text:span><text:span text:style-name="T2">(19/8) </text:span> [ <text:line-break/><text:span text:style-name="T1"> </text:span><text:span text:style-name="T2">(19/9) </text:span> [ <text:line-break/><text:span text:style-name="T1"> </text:span><text:span text:style-name="T2">(19/10) </text:span> [ <text:line-break/><text:span text:style-name="T1"> </text:span><text:span text:style-name="T2">(19/11) </text:span> [ <text:line-break/><text:span text:style-name="T1"> </text:span><text:span text:style-name="T2">(19/12) </text:span> [.].[ⲃ]ⲱ̣ⲗ ⲁⲃ̣[ⲁⲗ <text:line-break/><text:span text:style-name="T1"> </text:span><text:span text:style-name="T2">(19/13) </text:span> ⲛ̣̅ⲧⲉ ⲡ̣ⲁ̣ⲓⲱⲛ[ <text:line-break/><text:span text:style-name="T1"> </text:span><text:span text:style-name="T2">(19/14) </text:span> [ϭⲓ]ⲛⲉⲓ ⲁⲡⲓⲧ̅ⲛ̅[ <text:line-break/><text:span text:style-name="T1"> </text:span><text:span text:style-name="T2">(19/15) </text:span> 1̅6vacat̅16 ⲛ̅ⲇⲉ̣[ ⲡⲁⲣ]‐ <text:line-break/><text:span text:style-name="T1"> </text:span><text:span text:style-name="T2">(19/16) </text:span> ⲕ̅ⲛ̅ ⲁⲃⲁⲗ ϩ̅ⲛ̅ 〈ⲛ〉ⲁⲓ[ⲱⲛ ⲉⲧϣⲟⲟⲡ ϩ̅ⲙ̅] <text:line-break/><text:span text:style-name="T1"> </text:span><text:span text:style-name="T2">(19/17) </text:span> ⲡⲙⲁ ⲉⲧ̅ⲙ̅ⲙⲉⲩ ⲉⲩ̣[ⲛ̅ ϩⲁⲉⲓⲛⲉ ⲙⲉⲛ] <text:line-break/><text:span text:style-name="T1"> </text:span><text:span text:style-name="T2">(19/18) </text:span> ϣⲟⲟⲡ ϩ̅ⲛ̅ ⲧⲉⲕⲕ[ⲗⲏⲥⲓⲁ ⲉⲧⲟⲩⲁⲛ̅ϩ̅ ⲁ]‐ <text:line-break/><text:span text:style-name="T1"> </text:span><text:span text:style-name="T2">(19/19) </text:span> ⲃⲁⲗ ⲛⲉⲧϣⲟⲟⲡ [ϩ̅ⲛ̅ ⲧⲉⲕⲕⲗⲏⲥⲓⲁ] <text:line-break/><text:span text:style-name="T1"> </text:span><text:span text:style-name="T2">(19/20) </text:span> ⲛ̅ⲣⲱⲙⲉ· ϩ̅ⲛ̅ ⲟⲩⲟ[ⲩⲉⲉⲓ ⲛ̅ⲟⲩⲱⲧ ⲛ̅]‐ <text:line-break/><text:span text:style-name="T1"> </text:span><text:span text:style-name="T2">(19/21) </text:span> ⲇⲉ ⲉⲩⲧⲁϣⲉ ⲁⲉⲓ̣[ϣ ⲛ̅ⲛⲉⲩⲉⲣⲏⲩ] <text:line-break/><text:span text:style-name="T1"> </text:span><text:span text:style-name="T2">(19/22) </text:span> ⲙ̅ⲡⲡⲗⲏⲣⲱⲙⲁ ⲙ̅ⲡ̣[ⲉⲩⲁⲓⲱⲛ ⲟⲩⲛ̅] <text:line-break/><text:span text:style-name="T1"> </text:span><text:span text:style-name="T2">(19/23) </text:span> ϩⲁⲉⲓⲛⲉ [5̅0̅ⲛ̅50]ⲇ̣ⲉ ⲉⲩϣⲟⲟ̣ⲡ [ⲙ̅ⲙⲟⲩ ϩ̅ⲛ̅] <text:line-break/><text:span text:style-name="T1"> </text:span><text:span text:style-name="T2">(19/24) </text:span> ⲧⲉⲕⲕⲗⲏⲥⲓⲁ ⲉⲧ⟦ⲡⲏⲧ⟧ⲃ[ⲏⲧ̅ⲥ̅ ⲉⲩ]‐ <text:line-break/><text:span text:style-name="T1"> </text:span><text:span text:style-name="T2">(19/25) </text:span> ⲡⲏⲧ ⲧⲉⲉⲓ ⲉⲩϣⲟⲟⲡ ⲛⲉⲥ ⲙ̣̅[ⲡ]ⲙ̣[ⲟⲩ] <text:line-break/><text:span text:style-name="T1"> </text:span><text:span text:style-name="T2">(19/26) </text:span> ϩ̅ⲛ̅ⲕⲁⲩⲉ ⲛ̅ⲇⲉ ⲙ̅ⲡⲱⲛ̅ϩ̅ ⲉⲧⲃⲉ ⲡ[ⲉⲉⲓ] <text:line-break/><text:span text:style-name="T1"> </text:span><text:span text:style-name="T2">(19/27) </text:span> ϩ̅ⲙ̅ⲙⲁⲉⲓϩⲟⲩⲉⲱⲱⲛϩ ⲛ[ⲉ] ⲁ̣ⲩ̣[ⲱ] <text:line-break/><text:span text:style-name="T1"> </text:span><text:span text:style-name="T2">(19/28) </text:span> ⲡⲟⲩⲉⲉⲓ ⲡⲟⲩⲉⲉⲓ ⲙ̅ⲡⲕⲉⲥⲉⲡ̣[ⲉ ϣⲱⲡ] <text:line-break/><text:span text:style-name="T1"> </text:span><text:span text:style-name="T2">(19/29) </text:span> ⲁⲣⲁϥ ϩⲓⲧ̅ⲛ̅ ⲧⲉϥⲛⲟⲩⲛⲉ ⲙ̅ⲙⲓ̣ⲛ̣ [ⲙ̅]‐ <text:line-break/><text:span text:style-name="T1"> </text:span><text:span text:style-name="T2">(19/30) </text:span> ⲙⲁϥ̅ ϥ̅ⲧⲉⲟⲩⲟ ⲁⲃⲁⲗ ⲙ̅ⲡⲕⲁⲣⲡ̣[ⲟⲥ ⲉ]‐ <text:line-break/><text:span text:style-name="T1"> </text:span><text:span text:style-name="T2">(19/31) </text:span> ϯⲛⲉ ⲙ̅ⲙⲁϥ ⲉⲡⲉⲓⲇⲏ ⲛ̅ⲛⲟⲩⲛ[ⲉ ⲟⲩⲛ]‐ <text:line-break/><text:span text:style-name="T1"> </text:span><text:span text:style-name="T2">(19/32) </text:span> ⲧ̣ⲉⲩ ⲙ̅ⲙⲉⲩ ⲛ̅ⲟⲩⲥⲩⲛⲁⲫⲏ ϣⲁ ⲛ̣[ⲉⲩ] <text:line-break/><text:span text:style-name="T1"> </text:span><text:span text:style-name="T2">(19/33) </text:span> ⲉ̣[ⲣ]ⲏⲩ· ⲁⲩⲱ ⲛⲉⲩⲕⲁⲣⲡⲟⲥ ϩ̅ⲛ̅ⲁⲧⲡⲱ‐ <text:line-break/><text:span text:style-name="T1"> </text:span><text:span text:style-name="T2">(19/34) </text:span> ϣⲉ ⲛⲉ ⲛⲁⲡⲟⲩⲉⲉⲓ ⲡⲟⲩⲓ̈ ⲉⲧⲥⲁⲧⲡ· <text:line-break/><text:span text:style-name="T1"> </text:span><text:span text:style-name="T2">(19/35) </text:span> ⲟⲩⲛⲧⲉⲩⲥⲉ ⲙ̅ⲙⲉⲩ ⲉⲩϣⲟⲟⲡ ⲛⲉⲩ <text:line-break/><text:span text:style-name="T1"> </text:span><text:span text:style-name="T2">(19/36) </text:span> ⲙ̅ⲛ̅ ⲛⲉⲩⲉⲣⲏⲩ ⲙⲁⲣ̅ⲛ̅ϣⲱⲡⲉ ⲛ̅‐ <text:line-break/><text:span text:style-name="T1"> </text:span><text:span text:style-name="T2">(19/37) </text:span> ⲇⲉ ⲉⲛⲧ̅ⲛ̅ⲧⲱⲛ ⲁⲛⲛⲟⲩⲛⲉ ⲉⲛϣⲏϣ <text:line-break/><text:span text:style-name="T1"> </text:span><text:span text:style-name="T2">(20/1) </text:span> [ 12+- ]ⲡ̣̅ ⲛⲉ ⲙ̅ⲙⲁⲛ ⲛ̅ⲕⲁ̣[ <text:line-break/><text:span text:style-name="T1"> </text:span><text:span text:style-name="T2">(20/2) </text:span> [ 12+- ]ⲁ̣ⲓⲱⲛ ⲉⲧ̅ⲙ̅ⲙⲉⲩ .[ <text:line-break/><text:span text:style-name="T1"> </text:span><text:span text:style-name="T2">(20/3) </text:span> [ 12+- ]ⲛ̅ⲛⲉⲧⲉ ⲛⲟⲩⲛ ⲉⲛ [ⲛⲉ] <text:line-break/><text:span text:style-name="T1"> </text:span><text:span text:style-name="T2">(20/4) </text:span> [ 12+- ]ⲛ̣ ⲛ̅ⲧⲡⲉ ⲙ̅ⲡⲫ̣.[ <text:line-break/><text:span text:style-name="T1"> </text:span><text:span text:style-name="T2">(20/5) </text:span> [ 12+- ⲉⲙ]ⲁ̣ϩⲧⲉ ⲙ̣̅ⲙ̣ⲁ̣ϥ̣ .̅[ <text:line-break/><text:span text:style-name="T1"> </text:span><text:span text:style-name="T2">(20/6) </text:span> [ 12+- ]ⲡⲛ̣̅[ <text:line-break/><text:span text:style-name="T1"> </text:span><text:span text:style-name="T2">(20/7) </text:span> [ 12+- ].̅[ <text:line-break/><text:span text:style-name="T1"> </text:span><text:span text:style-name="T2">(20/8) </text:span> (4 lines missing) <text:line-break/><text:span text:style-name="T1"> </text:span><text:span text:style-name="T2">(20/12) </text:span> [ 13+- ]ⲩⲛ ⲡ[..]..[ <text:line-break/><text:span text:style-name="T1"> </text:span><text:span text:style-name="T2">(20/13) </text:span> [ 13+- ]. ⲉⲡⲉ̣ⲓ̣ ⲙ̣̅ⲙⲉⲛ̣ <text:line-break/><text:span text:style-name="T1"> </text:span><text:span text:style-name="T2">(20/14) </text:span> [ 9+- ⲧⲉ]ⲕⲯⲩⲭⲏ ϥ̅ⲛⲁ[ <text:line-break/><text:span text:style-name="T1"> </text:span><text:span text:style-name="T2">(20/15) </text:span> [ 11+- ⲁ]ⲛⲧⲉⲉⲓⲕ ⲛⲉϥ̅ ⲙ̅ <text:line-break/><text:span text:style-name="T1"> </text:span><text:span text:style-name="T2">(20/16) </text:span> [ 9+- ⲉ]ⲕϣⲁⲛⲧⲟⲩⲃⲟ ⲙ̅‐ <text:line-break/><text:span text:style-name="T1"> </text:span><text:span text:style-name="T2">(20/17) </text:span> [ⲙⲁⲥ ⲉⲥϭⲱ ⲛ̅ϩ]ⲏⲧ%6 ⲉⲕϣⲁⲛϣⲧⲉⲙ <text:line-break/><text:span text:style-name="T1"> </text:span><text:span text:style-name="T2">(20/18) </text:span> [ⲙ̅ⲙⲁⲥ ⲥ̅ⲏⲡ ⲁⲡ]ⲇⲓⲁⲃⲟⲗⲟⲥ ⲉⲕϣⲁⲛ <text:line-break/><text:soft-page-break/><text:span text:style-name="T1"> </text:span><text:span text:style-name="T2">(20/19) </text:span> [ⲙⲟⲩⲟⲩⲧ ⲁⲛ ⲛ̅]ⲛⲉϥ̅ⲉⲛⲉⲣⲅⲉⲓⲁ ⲉⲧⲣ̅ <text:line-break/><text:span text:style-name="T1"> </text:span><text:span text:style-name="T2">(20/20) </text:span> [ⲉⲛⲉⲣⲅⲉⲓ ⲥⲛⲁϣ]ⲱⲡⲉ ⲛ̅ⲙⲙⲉⲕ· ⲉⲓ‐ <text:line-break/><text:span text:style-name="T1"> </text:span><text:span text:style-name="T2">(20/21) </text:span> [ϣⲡⲉ ⲧⲯⲩⲭⲏ ⲛ̅ⲅ]ⲁⲣ ⲥⲙⲁⲩⲧ%6 ⲉⲧⲓ ⲁⲩⲣ̅‐ <text:line-break/><text:span text:style-name="T1"> </text:span><text:span text:style-name="T2">(20/22) </text:span> [ⲉⲛⲉⲣⲅⲉⲓ ⲁⲛ]ⲁ̣ⲣⲁⲥ̣ ⲛ̅ϭⲓ ⲛⲁⲣⲭⲏ ⲙ̅ⲛ̅ <text:line-break/><text:span text:style-name="T1"> </text:span><text:span text:style-name="T2">(20/23) </text:span> [ⲛ̅ⲉⲝⲟⲩⲥ]ⲓ̣ⲁ ⲉⲩ ϯⲛⲟⲩ ⲡ̣ⲉⲧⲕⲙⲉⲩⲉ̣ <text:line-break/><text:span text:style-name="T1"> </text:span><text:span text:style-name="T2">(20/24) </text:span> [ⲁⲣⲁϥ ⲉϥ]ϣⲟⲟⲡ ⲛ̅ⲡⲛ̣ⲉⲩⲙⲁ ⲙ̅ⲙⲁⲛ <text:line-break/><text:span text:style-name="T1"> </text:span><text:span text:style-name="T2">(20/25) </text:span> [ⲉⲧ]ⲃ̣[ⲉ ⲉ]ⲩ ⲥⲉ→ⲣ←ⲇⲓⲱⲕⲉ ⲛ̅ⲥⲁ ⲛⲓⲣⲱⲙⲉ ⲛ̅‐ <text:line-break/><text:span text:style-name="T1"> </text:span><text:span text:style-name="T2">(20/26) </text:span> ϯ̣ⲙⲓⲛⲉ ⲛ̅ϣⲁϩⲣⲏⲓ̈ ⲁⲡⲙⲟⲩ ⲙⲏ <text:line-break/><text:span text:style-name="T1"> </text:span><text:span text:style-name="T2">(20/27) </text:span> [ⲉ]ⲩⲣ̣[ⲱ]ϣⲉ ⲉⲛ ⲁϣⲱⲡⲉ ⲙ̅ⲛ̅ ⲧⲯⲩ‐ <text:line-break/><text:span text:style-name="T1"> </text:span><text:span text:style-name="T2">(20/28) </text:span> [ⲭⲏ ⲁⲩ]ⲱ ⲥⲉϣⲓⲛⲉ ⲛ̅ⲥⲱⲥ· ⲥⲉϣ‐ <text:line-break/><text:span text:style-name="T1"> </text:span><text:span text:style-name="T2">(20/29) </text:span> [ⲧⲉⲙ] ⲛ̅ⲅⲁⲣ ⲁⲣⲱⲩ ⲙ̅ⲙⲁ ⲛⲓⲙ ϩⲓⲧ̅ⲛ̅ <text:line-break/><text:span text:style-name="T1"> </text:span><text:span text:style-name="T2">(20/30) </text:span> [ⲛ̅ⲣ]ⲱⲙⲉ ⲙ̅ⲡⲛⲟⲩⲧⲉ ⲉⲫⲟⲥⲟⲛ ⲥⲉ‐ <text:line-break/><text:span text:style-name="T1"> </text:span><text:span text:style-name="T2">(20/31) </text:span> ϣ̣ⲟ̣ⲟⲡ ϩⲛ̅ ⲥⲁⲣⲝ ⲁⲩⲱ ⲛ̅ⲧⲁⲣⲟⲩⲧ̅ⲙ̅ <text:line-break/><text:span text:style-name="T1"> </text:span><text:span text:style-name="T2">(20/32) </text:span> [ϣ]ϭⲛ̅ϭⲁⲙ ⲁⲛⲉⲩ ⲁⲣⲁⲩ ⲉⲩⲣ̅ⲡⲟ‐ <text:line-break/><text:span text:style-name="T1"> </text:span><text:span text:style-name="T2">(20/33) </text:span> ⲗⲓⲧⲉⲩⲉⲥⲑⲁⲓ ϩ̅ⲙ̅ ⲡⲡⲛⲉⲩⲙⲁ ϣⲁ‐ <text:line-break/><text:span text:style-name="T1"> </text:span><text:span text:style-name="T2">(20/34) </text:span> ⲣⲟⲩⲥⲗⲁⲡⲗ̅ⲡ̅ ⲙ̅ⲡⲉⲧⲟⲩⲁⲛϩ ⲁⲃ̣ⲁⲗ <text:line-break/><text:span text:style-name="T1"> </text:span><text:span text:style-name="T2">(20/35) </text:span> ϩⲱⲥ ⲧⲉⲉⲓ ⲧⲉ ⲑⲉ ⲉⲧⲟⲩϭⲛ̅ϭⲁⲙ ⲛ̅‐ <text:line-break/><text:span text:style-name="T1"> </text:span><text:span text:style-name="T2">(20/36) </text:span> ϭⲓⲛⲉ ⲙ̅ⲙⲁⲩ ⲁⲗⲗⲁ ⲉⲩ ⲡⲉ ⲫⲏⲩ ⲛⲉⲩ‐ <text:line-break/><text:span text:style-name="T1"> </text:span><text:span text:style-name="T2">(20/37) </text:span> ⲥⲉⲗⲁⲃⲓ ϩ̅ⲛ̅ ⲟⲩⲙ̅ⲛ̅ⲧⲁⲑⲏⲧ%6 ⲥⲉⲡⲱϩ <text:line-break/><text:span text:style-name="T1"> </text:span><text:span text:style-name="T2">(20/38) </text:span> ⲙ̅ⲡⲉⲩⲕⲱⲧⲉ ⲥⲉϭⲱϫⲉ ⲙ̅ⲡⲕⲁϩ <text:line-break/><text:span text:style-name="T1"> </text:span><text:span text:style-name="T2">(21/1) </text:span> [ 7+- ].[.]ⲡ̣ⲟ̣[ <text:line-break/><text:span text:style-name="T1"> </text:span><text:span text:style-name="T2">(21/2) </text:span> [ 6+- ]ⲡ̣ⲟⲩ ⲙ̅ⲡ[ <text:line-break/><text:span text:style-name="T1"> </text:span><text:span text:style-name="T2">(21/3) </text:span> [.....]ⲙ̣̅ⲙⲁϥ· ⲉϥ̣[ <text:line-break/><text:span text:style-name="T1"> </text:span><text:span text:style-name="T2">(21/4) </text:span> [....].ϩⲱⲡ ⲙ̅[ <text:line-break/><text:span text:style-name="T1"> </text:span><text:span text:style-name="T2">(21/5) </text:span> [.....].ϣⲟⲟⲡ[ <text:line-break/><text:span text:style-name="T1"> </text:span><text:span text:style-name="T2">(21/6) </text:span> [.....ⲧ]ⲟ̣ⲩⲃⲟ[ <text:line-break/><text:span text:style-name="T1"> </text:span><text:span text:style-name="T2">(21/7) </text:span> [ 10+- ].[ <text:line-break/><text:span text:style-name="T1"> </text:span><text:span text:style-name="T2">(21/8) </text:span> (Lines 8-15 lacking) <text:line-break/><text:span text:style-name="T1"> </text:span><text:span text:style-name="T2">(21/16) </text:span> ⲇⲉ ⲡ[.]ⲡ̣ⲉ.[ <text:line-break/><text:span text:style-name="T1"> </text:span><text:span text:style-name="T2">(21/17) </text:span> ⲁⲃⲁⲗ ⲛ̅ⲛϩ̣[ <text:line-break/><text:span text:style-name="T1"> </text:span><text:span text:style-name="T2">(21/18) </text:span> ⲛ̅ⲥⲁ ⲡⲛⲟⲩⲧⲉ̣[ ⲉ]‐ <text:line-break/><text:span text:style-name="T1"> </text:span><text:span text:style-name="T2">(21/19) </text:span> ⲙⲁϩⲧⲉ ⲙ̅ⲙⲁⲛ[ <text:line-break/><text:span text:style-name="T1"> </text:span><text:span text:style-name="T2">(21/20) </text:span> ⲁⲗⲗⲁ ⲉⲛⲙⲁϩⲉ̣[ ⲉⲓϣ]‐ <text:line-break/><text:span text:style-name="T1"> </text:span><text:span text:style-name="T2">(21/21) </text:span> ⲡⲉ ⲛ̅ⲛⲁⲃⲓ ⲛ̅ⲅⲁ[ⲣ ⲛⲁϣⲱⲟⲩ ⲡⲟⲥⲱ] <text:line-break/><text:span text:style-name="T1"> </text:span><text:span text:style-name="T2">(21/22) </text:span> ϯⲛⲟⲩ ⲛ̅ϩⲟⲩⲟ →ⲡⲫ̣←[ⲑⲟⲛⲟⲥ ⲛ̅ⲧⲉⲕⲕⲗⲏ]‐ <text:line-break/><text:span text:style-name="T1"> </text:span><text:span text:style-name="T2">(21/23) </text:span> ⲥⲓⲁ ⲙ̅ⲡⲥⲱⲧⲏⲣ ⲡ̣ⲓⲟ[ⲩⲉⲉⲓ ⲡⲓⲟⲩⲉⲉⲓ] <text:line-break/><text:span text:style-name="T1"> </text:span><text:span text:style-name="T2">(21/24) </text:span> ⲛ̅ⲅⲁⲣ ⲛⲉⲩ̣ⲛ̅ⲧⲉϥ ϭⲁⲙ ⲙ̣̅[ⲡⲉⲥⲛⲉⲩ] <text:line-break/><text:span text:style-name="T1"> </text:span><text:span text:style-name="T2">(21/25) </text:span> ⲛ̅ⲡⲡⲁⲣⲁⲡ̣ⲧⲱⲙⲁⲧⲓ ⲛ̅ϭ̣[ⲓ ⲡⲁⲟⲩϣⲁ]‐ <text:line-break/><text:span text:style-name="T1"> </text:span><text:span text:style-name="T2">(21/26) </text:span> ⲉⲓϫ ⲙ̅ⲛ̅ ⲟⲩⲓ̈ⲇⲓⲱⲧⲏⲥ ⲉⲩϭⲁ̣[ⲙ ⲁⲛ ⲛ̅]‐ <text:line-break/><text:span text:style-name="T1"> </text:span><text:span text:style-name="T2">(21/27) </text:span> ⲟⲩⲱⲧ ⲧⲉⲧⲉ ⲟⲩⲛⲧⲉⲟⲩⲥ ⲙ̅ⲙⲉⲩ ⲁ̣[ⲩ]‐ <text:line-break/><text:span text:style-name="T1"> </text:span><text:span text:style-name="T2">(21/28) </text:span> ⲱ ⲁⲛⲁⲛ ⲉⲛϣⲟⲟⲡ ⲛ̅ϣⲁ[ⲉ]ⲓ̣ϫ̣ [ⲙ̅]‐ <text:line-break/><text:span text:style-name="T1"> </text:span><text:span text:style-name="T2">(21/29) </text:span> 2ʹ99 2ⲡⲗⲟⲅⲟⲥ ⲉⲛϣⲁⲛⲣ̅ⲛⲁⲃⲓ ⲁ̣[ⲣⲁϥ] <text:line-break/><text:span text:style-name="T1"> </text:span><text:span text:style-name="T2">(21/30) </text:span> 2ʹ99 2ⲧ̅ⲛ̅ⲣ̅ⲛⲁⲃⲓ ⲛ̅ϩⲟⲩⲟ ⲁⲛⲉⲑⲛⲟⲥ̣ [ⲉ]ⲛ̣ <text:line-break/><text:span text:style-name="T1"> </text:span><text:span text:style-name="T2">(21/31) </text:span> 2ʹ99 2ϣⲁⲛϣⲱⲡⲉ ⲛ̅ⲇⲉ ⲛ̅ⲧⲡⲉ ⲛ̅ⲛ̣ⲁ̣ⲃ̣[ⲓ] <text:line-break/><text:span text:style-name="T1"> </text:span><text:span text:style-name="T2">(21/32) </text:span> 2ʹ99 2ⲛⲓⲙ ⲧ̅ⲛ̅ⲛⲁϫⲓ ⲙ̅ⲡ⟦ⲗⲁ⟧ⲕⲗⲁⲙ ⲙ̣ <text:line-break/><text:span text:style-name="T1"> </text:span><text:span text:style-name="T2">(21/33) </text:span> 2ʹ99 2ⲡϫⲣⲟ ⲛ̅ⲑⲉ ⲛ̅ⲧ̅ⲛ̅ⲁⲡⲉ ⲛ̅ⲧⲁϩϫ̣[ⲓ] <text:line-break/><text:soft-page-break/><text:span text:style-name="T1"> </text:span><text:span text:style-name="T2">(21/34) </text:span> 2 ʹ99 2ⲉⲁ̣ⲩ ϩⲓⲧ̅ⲙ̅ ⲡⲓⲱⲧ ʹ99 <text:line-break/><text:span text:style-name="T1"> </text:span><text:span text:style-name="T2">(21/35) </text:span> {2̅ⲑ̅ⲉ̅ⲣ̅ⲙ̅ⲏ}2ⲛⲓⲁ 5̅01̅ⲛ̅ⲧⲅⲛⲱⲥⲓⲥ̅1̅50 </text:p>
      <text:p text:style-name="P1"/>
      <text:p text:style-name="P3">( codex XI ) A Valentinian Exposition</text:p>
      <text:p text:style-name="P2"><text:span text:style-name="T1"> </text:span><text:span text:style-name="T2">(22/1) </text:span> [ 10+- ⲟ]ⲩⲧⲉ ϩ̅ⲛ̅[ <text:line-break/><text:span text:style-name="T1"> </text:span><text:span text:style-name="T2">(22/2) </text:span> [ 10+- ]ⲉⲓ ⲁϩⲟ[ⲩⲛ <text:line-break/><text:span text:style-name="T1"> </text:span><text:span text:style-name="T2">(22/3) </text:span> [ 10+- ]ⲧ̣ⲭⲟⲣⲏⲅ̣[ⲓⲁ <text:line-break/><text:span text:style-name="T1"> </text:span><text:span text:style-name="T2">(22/4) </text:span> [ 10+- ]ⲣ ⲙ̅ⲙⲁⲉⲓ̣[ <text:line-break/><text:span text:style-name="T1"> </text:span><text:span text:style-name="T2">(22/5) </text:span> [ 10+- ]ⲛⲉⲧⲉ.[ <text:line-break/><text:span text:style-name="T1"> </text:span><text:span text:style-name="T2">(22/6) </text:span> [ 10+- ]ⲛ̣̅ⲡ.[ <text:line-break/><text:span text:style-name="T1"> </text:span><text:span text:style-name="T2">(22/7) </text:span> (Lines 7-15 lacking) <text:line-break/><text:span text:style-name="T1"> </text:span><text:span text:style-name="T2">(22/16) </text:span> [ 12+- ϯⲛⲁ]ϫⲉ ⲡ̣ⲁⲙⲩⲥ̣‐ <text:line-break/><text:span text:style-name="T1"> </text:span><text:span text:style-name="T2">(22/17) </text:span> [ⲧⲏⲣⲓⲟⲛ ⲁⲛⲉⲉⲓ ⲉⲧ]ϣ̣ⲟⲟⲡ ⲛⲏⲉⲓ ⲙ̅ⲛ̣̅̅ <text:line-break/><text:span text:style-name="T1"> </text:span><text:span text:style-name="T2">(22/18) </text:span> [ⲛⲉⲧⲛⲁϣⲱⲡⲉ ⲛ]ⲏ̣ⲉⲓ ⲛⲉⲉⲓ ϭⲉ ⲛⲉⲛ‐ <text:line-break/><text:span text:style-name="T1"> </text:span><text:span text:style-name="T2">(22/19) </text:span> [ⲧⲁϩ̅ⲙ̅ⲙⲉ ⲁⲡⲏ ⲉⲧ]ϣⲟⲟⲡ· ⲡⲓⲱⲧ ⲉⲧⲉ <text:line-break/><text:span text:style-name="T1"> </text:span><text:span text:style-name="T2">(22/20) </text:span> [ⲡⲉⲉⲓ ⲡⲉ ⲧⲛⲟⲩⲛ]ⲉ ⲙ̅ⲡⲧⲏⲣ̅ϥ̅ ⲡⲓⲁⲧ‐ <text:line-break/><text:span text:style-name="T1"> </text:span><text:span text:style-name="T2">(22/21) </text:span> [ϣⲉϫⲉ ⲁⲣⲁϥ ⲉⲧ]ϣⲟⲟⲡ ϩ̅ⲛ̅ ⲧⲙⲟⲛⲁⲥ <text:line-break/><text:span text:style-name="T1"> </text:span><text:span text:style-name="T2">(22/22) </text:span> [ⲉϥ̅ϣⲟⲟⲡ ⲟⲩⲁⲉⲉⲧ]ϥ̣̅ ϩ̅ⲛ̅ ⲡⲕⲁⲣⲱϥ̅ ⲡⲕⲁ‐ <text:line-break/><text:span text:style-name="T1"> </text:span><text:span text:style-name="T2">(22/23) </text:span> [ⲣⲱϥ̅ ⲛ̅ⲇⲉ ⲡ]ⲉ̣ ⲡⲥϭⲣⲁϩ̅ⲧ̅· ⲉⲡⲉⲓ ⲟⲩⲛ <text:line-break/><text:span text:style-name="T1"> </text:span><text:span text:style-name="T2">(22/24) </text:span> [ⲛⲉϥϣⲟⲟ]ⲡ̣ ⲙ̅ⲙⲟⲛⲁⲥ ⲁⲩ̣ⲱ̣ ⲛⲉⲙ̅ⲛ̅ <text:line-break/><text:span text:style-name="T1"> </text:span><text:span text:style-name="T2">(22/25) </text:span> [ⲗⲁⲩⲉ ϣⲟ]ⲟ̣ⲡ ϩⲁⲧⲉϥⲉϩⲏ ⲉϥ̅ϣⲟⲟⲡ <text:line-break/><text:span text:style-name="T1"> </text:span><text:span text:style-name="T2">(22/26) </text:span> [ϩ̅ⲛ̅ ⲧⲇ]ⲩ̣ⲁⲥ ⲁⲩⲱ ϩ̅ⲛ̅ ⲡⲥⲁⲉⲓϣ· ⲡⲉϥ‐ <text:line-break/><text:span text:style-name="T1"> </text:span><text:span text:style-name="T2">(22/27) </text:span> [ⲥ]ⲁ̣ⲉⲓϣ ⲛ̅ⲇⲉ ⲡⲉ ⲧⲥⲓⲅⲏ ⲛⲉⲩⲛ̅ⲧⲉϥ̅ ⲛ̅‐ <text:line-break/><text:span text:style-name="T1"> </text:span><text:span text:style-name="T2">(22/28) </text:span> [ⲇ]ⲉ̣ ⲙ̣̅ⲙ̣ⲉⲩ ⲙ̅ⲡⲧⲏⲣ̅ϥ̅ ⲉⲩϣⲟⲟⲡ ⲛ̅ϩ‐ <text:line-break/><text:span text:style-name="T1"> </text:span><text:span text:style-name="T2">(22/29) </text:span> [ⲣⲏⲓ̈ ⲛ̅]ϩⲏⲧ̅ϥ̅ ⲁⲩⲱ ⲡⲟⲩⲱϣⲉ ⲙ̅ⲛ̅ <text:line-break/><text:span text:style-name="T1"> </text:span><text:span text:style-name="T2">(22/30) </text:span> ⲡ̣ϣ̣ⲱⲡⲉ ⲡⲙⲁⲉⲓⲉ ⲙ̅ⲛ̅ ⲡϭⲱ <text:line-break/><text:span text:style-name="T1"> </text:span><text:span text:style-name="T2">(22/31) </text:span> ⲛ̣ⲉⲉⲓ ϭⲉ ϩ̅ⲛ̅ⲁⲧϫⲡⲁⲩ ⲛⲉ ⲡⲛⲟⲩⲧⲉ <text:line-break/><text:span text:style-name="T1"> </text:span><text:span text:style-name="T2">(22/32) </text:span> [ⲁϥⲉ]ⲓ̣ ⲁⲃⲁⲗ ⲡϣⲏⲣⲉ ⲡⲛⲟⲩⲥ ⲙ̅ⲡⲧⲏ‐ <text:line-break/><text:span text:style-name="T1"> </text:span><text:span text:style-name="T2">(22/33) </text:span> [ⲣ]ϥ̣̅ ⲉⲧⲉ ⲡⲉⲉⲓ ⲡⲉ ϫⲉ ⲁⲃⲁⲗ ϩ̅ⲛ̅ ⲧⲛⲟⲩⲛⲉ <text:line-break/><text:span text:style-name="T1"> </text:span><text:span text:style-name="T2">(22/34) </text:span> ⲙ̅ⲡⲧⲏⲣ̅ϥ̅ ⲉⲣⲉⲡⲉϥ̅ⲕⲉⲙⲉⲩⲉ ϣⲟⲟⲡ <text:line-break/><text:span text:style-name="T1"> </text:span><text:span text:style-name="T2">(22/35) </text:span> ⲡⲉⲉⲓ ⲅⲁⲣ ⲛⲉⲟⲩⲛⲧⲉϥ̅ⲃ̅ ⲙ̅ⲙⲉⲩ ϩ̅ⲙ̣̅ <text:line-break/><text:span text:style-name="T1"> </text:span><text:span text:style-name="T2">(22/36) </text:span> ⲡⲛⲟⲩⲥ ⲉⲧⲃⲉ ⲡⲧⲏⲣ̅ϥ̅ ⲛ̅ⲅⲁⲣ ⲁϥ̅ϫⲓ <text:line-break/><text:span text:style-name="T1"> </text:span><text:span text:style-name="T2">(22/37) </text:span> ⲛ̅ⲟⲩⲙⲉⲩⲉ ⲛ̅ϣ̅ⲙ̅ⲙⲟ ⲛⲉⲙ̅ⲛ̅ⲗⲁⲩⲉ <text:line-break/><text:span text:style-name="T1"> </text:span><text:span text:style-name="T2">(22/38) </text:span> ⲛ̅ⲅⲁⲣ ϣⲟⲟⲡ ϩⲁⲧⲉϥⲉϩⲏ· ⲁⲃⲁⲗ ϩ̅ⲙ̅ <text:line-break/><text:span text:style-name="T1"> </text:span><text:span text:style-name="T2">(22/39) </text:span> ⲡⲙⲁ ⲉⲧ̅ⲙ̅ⲙⲉⲩ ⲛ̅ⲧⲁϥ ⲡⲉ ⲉⲛⲧⲁϩⲕⲓⲙ <text:line-break/><text:span text:style-name="T1"> </text:span><text:span text:style-name="T2">(23/16) </text:span> (Lines 1--16 lacking) <text:line-break/><text:span text:style-name="T1"> </text:span><text:span text:style-name="T2">(23/17) </text:span> [.]..[ <text:line-break/><text:span text:style-name="T1"> </text:span><text:span text:style-name="T2">(23/18) </text:span> ⲁⲉⲓ..[....].[ 7+- ].ⲟ̣[ⲩⲡⲏⲅⲏ] <text:line-break/><text:span text:style-name="T1"> </text:span><text:span text:style-name="T2">(23/19) </text:span> ⲉⲥⲃⲉⲃⲉ ⲧ̣ⲉⲉⲓ ϭ̣ⲉ̣ [ⲧⲉ ⲧⲛ]ⲟⲩⲛⲉ̣ [ⲙ̅ⲡⲧⲏ]‐ <text:line-break/><text:span text:style-name="T1"> </text:span><text:span text:style-name="T2">(23/20) </text:span> ⲣϥ̅ ⲁⲩⲱ ⲙⲟⲛⲁⲥ̣ [ⲡⲉ ⲉ]ⲙ̅ⲛ̅ⲗ[ⲁⲩⲉ ϩⲁ]‐ <text:line-break/><text:span text:style-name="T1"> </text:span><text:span text:style-name="T2">(23/21) </text:span> ⲧⲉϥⲉϩⲏ· ⲧⲙⲁϩⲥ̣ⲛ̣̅[ⲧ]ⲉ ⲛ̅ⲇⲉ [ⲛ̅ⲡⲏⲅⲏ] <text:line-break/><text:span text:style-name="T1"> </text:span><text:span text:style-name="T2">(23/22) </text:span> ⲉϥϣⲟⲟⲡ ϩ̅ⲛ̅ ⲧⲥ̣ⲓ̣ⲅⲏ̣ ⲁⲩⲱ [ⲉϥϣⲉ]‐ <text:line-break/><text:span text:style-name="T1"> </text:span><text:span text:style-name="T2">(23/23) </text:span> ϫⲉ ⲛ̅ⲙ̅ⲙⲉϥ ⲟⲩⲁⲉ̣ⲉⲧ̅ϥ̅ ⲧⲙ̣[ⲁϩϥ̅ⲧⲟⲉ] <text:line-break/><text:span text:style-name="T1"> </text:span><text:span text:style-name="T2">(23/24) </text:span> ⲛ̣̅ⲇⲉ ⲕⲁⲧ̣ⲁ̣ ⲑⲉ ⲛ̅ⲧⲁϥ ⲡ̣ⲉⲛ̣[ⲧⲁϩϥ̅]‐ <text:line-break/><text:span text:style-name="T1"> </text:span><text:span text:style-name="T2">(23/25) </text:span> ⲱ̣ⲣϥ ⲁⲃⲁⲗ ⲙ̅ⲙⲁϥ̅ ⲟⲩⲁⲉ̣[ⲉⲧ̅ϥ̅ ϩ̅ⲛ̅ ⲧ]‐ <text:line-break/><text:span text:style-name="T1"> </text:span><text:span text:style-name="T2">(23/26) </text:span> ⲙⲁϩϥ̅ⲧⲟⲉ ⲉϥϣⲟⲟⲡ ϩ̅ⲛ̅ ⲧ̣[ⲙⲁϩ]‐ <text:line-break/><text:span text:style-name="T1"> </text:span><text:span text:style-name="T2">(23/27) </text:span> ϣ̅ⲛ̅ⲧ̅ϣⲉⲥⲉ ⲁϥ̅ϣⲣ̅ⲡ̅ ⲉⲓⲛ[ⲉ ⲙ̅ⲙⲁϥ] <text:line-break/><text:span text:style-name="T1"> </text:span><text:span text:style-name="T2">(23/28) </text:span> ⲟ̣ⲩⲁⲉⲉⲧ̅ϥ̅ ⲁⲩⲱ ϩ̅ⲛ̅ ⲧⲙⲁϩⲥ̅ⲛ̅[ⲧⲉ ⲁϥⲟⲩ]‐ <text:line-break/><text:span text:style-name="T1"> </text:span><text:span text:style-name="T2">(23/29) </text:span> ⲱⲛϩ ⲁⲃⲁⲗ ⲙ̅ⲡⲉϥ̅ⲟⲩⲱϣⲉ̣ [ⲁⲩⲱ] <text:line-break/><text:span text:style-name="T1"> </text:span><text:span text:style-name="T2">(23/30) </text:span> ϩ̅ⲛ̅ ⲧⲙⲁϩϥ̅ⲧⲟⲉ ⲁϥ̅ⲡⲱⲣϣ [ⲁⲃⲁ]ⲗ̣ <text:line-break/><text:span text:style-name="T1"> </text:span><text:span text:style-name="T2">(23/31) </text:span> ⲙ̅ⲙⲁϥ ⲟⲩⲁⲉⲉⲧ̅ϥ̅· ⲛⲉⲉⲓ ⲙ̅ⲙⲉⲛ ⲉ‐ <text:line-break/><text:soft-page-break/><text:span text:style-name="T1"> </text:span><text:span text:style-name="T2">(23/32) </text:span> ⲧϥⲉ ⲧⲛⲟⲩⲛⲉ ⲙ̅ⲡⲧⲏⲣ̅ϥ̅ ⲙⲁⲣⲛ̣̅[ⲉⲓ] <text:line-break/><text:span text:style-name="T1"> </text:span><text:span text:style-name="T2">(23/33) </text:span> ⲛ̅ⲇⲉ ⲁϩⲟⲩⲛ ⲁⲡⲉϥⲟⲩⲱⲛϩ ⲁⲃ[ⲁⲗ] <text:line-break/><text:span text:style-name="T1"> </text:span><text:span text:style-name="T2">(23/34) </text:span> ⲁⲩ̣ⲱ ⲧⲉϥⲙ̅ⲛ̅ⲧ̅ⲭⲣⲏⲥⲧⲟⲥ ⲙ̅ⲛ̅ ⲧⲉϥϭ̣ⲓ̣ <text:line-break/><text:span text:style-name="T1"> </text:span><text:span text:style-name="T2">(23/35) </text:span> ⲛ̅ⲉⲓ ⲁⲡⲓⲧ̅ⲛ̅ ⲙ̅ⲛ̅ ⲡⲧⲏⲣ̅ϥ̅ ⲉⲧⲉ ⲡⲉⲉⲓ <text:line-break/><text:span text:style-name="T1"> </text:span><text:span text:style-name="T2">(23/36) </text:span> ⲡⲉ ⲡϣⲏⲣⲉ ⲡⲓⲱⲧ ⲙ̅ⲡⲧⲏⲣ̅ϥ̅ ⲁⲩ‐ <text:line-break/><text:span text:style-name="T1"> </text:span><text:span text:style-name="T2">(23/37) </text:span> ⲱ ⲡⲛⲟⲩⲥ ⲙ̅ⲡⲡⲛⲉⲩⲙⲁ ⲛⲉⲩⲛ̅‐ <text:line-break/><text:span text:style-name="T1"> </text:span><text:span text:style-name="T2">(23/38) </text:span> ⲧ̣ⲉϥ ⲛ̅ⲅⲁⲣ ⲙ̅ⲙⲉⲩ ⲙ̅ⲡⲉⲉⲓ ⲁⲧⲉϩⲏ ⲙ̅ <text:line-break/><text:span text:style-name="T1"> </text:span><text:span text:style-name="T2">(24/15) </text:span> (Lines 1--15 lacking) <text:line-break/><text:span text:style-name="T1"> </text:span><text:span text:style-name="T2">(24/16) </text:span> [ 18+- ].[ <text:line-break/><text:span text:style-name="T1"> </text:span><text:span text:style-name="T2">(24/17) </text:span> [ 17+- ]ⲛ̣ⲉ̣[ <text:line-break/><text:span text:style-name="T1"> </text:span><text:span text:style-name="T2">(24/18) </text:span> [....]ⲡⲓ̣.[.....]ⲉ̣ ⲉⲧⲙ̣̅ⲙ̣ⲉ̣ⲩ ⲟⲩⲡⲏ‐ <text:line-break/><text:span text:style-name="T1"> </text:span><text:span text:style-name="T2">(24/19) </text:span> [ⲅⲏ ⲡⲉ] ⲡⲉⲉⲓ̣ [ⲟⲩⲡⲉ]ⲧ̣ⲟⲩⲱⲛ̅ϩ̅ ⲁⲃⲁⲗ ⲡⲉ <text:line-break/><text:span text:style-name="T1"> </text:span><text:span text:style-name="T2">(24/20) </text:span> [ϩ̅ⲛ̅ ⲧⲥ]ⲓ̣ⲅⲏ ⲁⲩ[ⲱ ⲟ]ⲩ̣ⲛⲟⲩⲥ ⲙ̅ⲡⲧⲏⲣ̅ϥ̅ <text:line-break/><text:span text:style-name="T1"> </text:span><text:span text:style-name="T2">(24/21) </text:span> [ⲡⲉ ⲉϥ]ϣⲟⲟⲡ̣ ϩⲛ̣̅ ⲟⲩⲙⲁϩⲥ̅ⲛ̅ⲧⲉ ⲙ̅ⲛ̅ <text:line-break/><text:span text:style-name="T1"> </text:span><text:span text:style-name="T2">(24/22) </text:span> [ⲡⲱ]ⲛ̣̅̅ϩ̅ ⲛ̅ⲧⲁϥ̅ ⲛ̅ⲅⲁⲣ ⲡⲉ ⲡⲣⲉϥ̅ⲧⲉⲩ <text:line-break/><text:span text:style-name="T1"> </text:span><text:span text:style-name="T2">(24/23) </text:span> [ⲟ ⲁⲃⲁⲗ] ⲙ̣̅ⲡⲧ̣ⲏⲣ̅ϥ̅ ⲁⲩⲱ ⲑ̣[ⲩ]ⲡⲟⲥⲧⲁⲥⲓ̣[ⲥ] <text:line-break/><text:span text:style-name="T1"> </text:span><text:span text:style-name="T2">(24/24) </text:span> [ⲟⲩⲁⲉⲉⲧ̅ⲥ̅] ⲙ̅ⲡⲉⲓⲱⲧ ⲉⲧ̣ⲉ [ⲧ]ⲉ̣ⲉⲓ ⲧⲉ ⲧⲉⲛ̣ <text:line-break/><text:span text:style-name="T1"> </text:span><text:span text:style-name="T2">(24/25) </text:span> [ⲛⲟⲓⲁ ⲧ]ⲉ̣ ⲁⲩⲱ 〈ⲧ〉ϭⲓⲛ̅ⲛ̅ⲧ̅ϥ̅ ⲁⲡⲓⲧ̅ⲛ̅ ⲙ̅ⲡ̣‐ <text:line-break/><text:span text:style-name="T1"> </text:span><text:span text:style-name="T2">(24/26) </text:span> [ⲥⲁ ⲙ̅]ⲡ̣ⲥⲁⲛⲡⲓⲧ̅ⲛ̅ ⲛ̅ⲧⲁⲣⲉϥⲟⲩⲱϣⲉ̣ <text:line-break/><text:span text:style-name="T1"> </text:span><text:span text:style-name="T2">(24/27) </text:span> [ⲛ̅ϭⲓ] ⲡϣ̅ⲣ̅ⲡ ⲛ̅ⲉⲓⲱⲧ ⲁϥⲟⲩⲁⲛϩ̅ϥ̅ ⲁ̣‐ <text:line-break/><text:span text:style-name="T1"> </text:span><text:span text:style-name="T2">(24/28) </text:span> [ⲃⲁⲗ ⲛ%7]ϩⲣⲏⲓ̈ ⲛ̅ϩⲏⲧ̅ϥ̅ ⲉⲡⲉⲓ ⲟⲩⲛ ⲉⲧⲃ[ⲏ]‐ <text:line-break/><text:span text:style-name="T1"> </text:span><text:span text:style-name="T2">(24/29) </text:span> [ⲧ̅ϥ̅ ⲉⲣⲉ]ⲡⲟⲩⲱⲛ̅ϩ̅ ⲁⲃⲁⲗ ϣⲟⲟⲡ ⲙ̅ⲡ̣‐ <text:line-break/><text:span text:style-name="T1"> </text:span><text:span text:style-name="T2">(24/30) </text:span> ⲧ̣ⲏⲣ̣[ϥ̅] ⲉⲉⲓϫⲟⲩ ⲇⲉ ⲙ̅ⲙⲁϥ̅ ⲁⲡⲧⲏⲣ̅ϥ̅ <text:line-break/><text:span text:style-name="T1"> </text:span><text:span text:style-name="T2">(24/31) </text:span> ϫ̣ⲉ ⲡ̣ⲟⲩⲱϣⲉ ⲙ̅ⲡⲧⲏⲣ̅ϥ̅ ⲁϥϫⲓ ⲇⲉ ⲙ̅‐ <text:line-break/><text:span text:style-name="T1"> </text:span><text:span text:style-name="T2">(24/32) </text:span> ⲡ̣ⲙ̣ⲉⲩⲉ ⲛ̅ϯⲙⲓⲛⲉ ⲉⲧⲃⲉ ⲡⲧⲏⲣ̅ϥ̅ ⲉⲉⲓ‐ <text:line-break/><text:span text:style-name="T1"> </text:span><text:span text:style-name="T2">(24/33) </text:span> [ϫ]ⲟⲩ ⲇⲉ ⲙ̅ⲙⲁⲥ ⲁⲡⲙⲉⲩⲉ ϫⲉ ⲡⲙⲟⲛⲟ‐ <text:line-break/><text:span text:style-name="T1"> </text:span><text:span text:style-name="T2">(24/34) </text:span> ⲅ̣ⲉⲛⲏⲥ ⲡⲛⲉⲩ ⲛ̅ⲅⲁⲣ ⲁⲡⲛⲟⲩⲧⲉ ⲛ̣̅‐ <text:line-break/><text:span text:style-name="T1"> </text:span><text:span text:style-name="T2">(24/35) </text:span> ⲧⲙⲏⲉ ⲡⲉϯ ⲉⲁⲩ ⲛ̅ⲧⲛⲟⲩⲛⲉ ⲙ̅ⲡ‐ <text:line-break/><text:span text:style-name="T1"> </text:span><text:span text:style-name="T2">(24/36) </text:span> ⲧⲏⲣ̅ϥ̅ ⲉⲧⲃⲉ ⲡⲉⲉⲓ ⲛ̅ⲧⲁϥ̅ ⲡⲉⲛ̅ⲧⲁϥ̅‐ <text:line-break/><text:span text:style-name="T1"> </text:span><text:span text:style-name="T2">(24/37) </text:span> ⲟⲩⲁⲛϩ̅ϥ̅ ⲁⲃⲁⲗ ⲟⲩⲁⲉⲉⲧ̅ϥ̅ ϩ̅ⲙ̅ ⲡⲙⲟ‐ <text:line-break/><text:span text:style-name="T1"> </text:span><text:span text:style-name="T2">(24/38) </text:span> ⲛⲟⲅⲉⲛⲏⲥ ⲁⲩⲱ ⲛ̅ϩⲣⲏⲓ̈ ⲛ̅ϩⲏⲧ̅ϥ̅ <text:line-break/><text:span text:style-name="T1"> </text:span><text:span text:style-name="T2">(24/39) </text:span> ⲁϥ̅ⲟⲩⲱⲛ̅ϩ̅ ⲁⲃⲁⲗ ⲙ̅ⲡⲁⲧϣⲉϫⲉ ⲁ‐ <text:line-break/><text:span text:style-name="T1"> </text:span><text:span text:style-name="T2">(25/1) </text:span> [ⲣⲁϥ <text:line-break/><text:span text:style-name="T1"> </text:span><text:span text:style-name="T2">(25/16) </text:span> (Lines 1--16 lacking) <text:line-break/><text:span text:style-name="T1"> </text:span><text:span text:style-name="T2">(25/17) </text:span> [.].[ 13+- ]ⲡ̣..[ <text:line-break/><text:span text:style-name="T1"> </text:span><text:span text:style-name="T2">(25/18) </text:span> [.]ⲛⲉ̣[.....].[ 6+- ]ⲧⲙⲏ[ⲉ ⲁⲩ]‐ <text:line-break/><text:span text:style-name="T1"> </text:span><text:span text:style-name="T2">(25/19) </text:span> ⲛⲉⲩ ⲁⲣ̣[ⲁ]ϥ̣ ⲉϥϩ̣[ⲙⲁⲥⲧ] ϩ̣̅̅ⲛ̅ ⲧⲙⲟⲛ[ⲁⲥ ⲁⲩ]‐ <text:line-break/><text:span text:style-name="T1"> </text:span><text:span text:style-name="T2">(25/20) </text:span> ⲱ ϩ̅ⲛ̅ ⲧⲇ̣ⲩ̣ⲁⲥ ⲁ[ⲩⲱ ϩ̅]ⲛ̣̅ ⲧⲧⲉⲧⲣⲁ̣[ⲥ ⲁϥ]‐ <text:line-break/><text:span text:style-name="T1"> </text:span><text:span text:style-name="T2">(25/21) </text:span> ϣⲣ̅ⲡ̅ ⲛ̣̅ⲉⲓⲛⲉ ⲁⲃⲁ[ⲗ] ⲙ̣̅ⲡⲙⲟⲛ[ⲟⲅⲉⲛⲏⲥ] <text:line-break/><text:span text:style-name="T1"> </text:span><text:span text:style-name="T2">(25/22) </text:span> [5̅0̅ⲙ̅ⲛ̅50] ⲡ̣ϩ̣ⲟ̣[ⲣⲟ]ⲥ̣ ⲁⲩⲱ̣ ⲡ̣ϩ̣ⲟⲣⲟⲥ [ⲡⲉ ⲡⲣⲉϥ] <text:line-break/><text:span text:style-name="T1"> </text:span><text:span text:style-name="T2">(25/23) </text:span> [ⲡⲱⲣ̅ϫ̅ ⲁ]ⲃ̣ⲁⲗ ⲙ̣̅ⲡ̣ⲧⲏⲣ̅ϥ̅ [ⲁⲩⲱ ⲡⲧⲁϫ]‐ <text:line-break/><text:span text:style-name="T1"> </text:span><text:span text:style-name="T2">(25/24) </text:span> [ⲣⲟ ⲙ̅ⲡⲧⲏ5̅0̅ⲣ̅]̅ϥ̣̅̅50 ⲉ̣ⲩϣⲟⲟⲡ ⲛ̅[ <text:line-break/><text:span text:style-name="T1"> </text:span><text:span text:style-name="T2">(25/25) </text:span> [ 10+- ].ⲡ̣ϣⲉ ⲛ̣̅[ <text:line-break/><text:span text:style-name="T1"> </text:span><text:span text:style-name="T2">(25/26) </text:span> [.....ⲡⲛⲟ]ⲩ̣ⲥ ⲡⲉ ⲁ̣ⲩⲱ̣[ <text:line-break/><text:span text:style-name="T1"> </text:span><text:span text:style-name="T2">(25/27) </text:span> (Two lines lacking) <text:line-break/><text:span text:style-name="T1"> </text:span><text:span text:style-name="T2">(25/28) </text:span> [ 8+- ].[ <text:line-break/><text:span text:style-name="T1"> </text:span><text:span text:style-name="T2">(25/29) </text:span> ⲙ̣̅ⲡϣ̣[ⲏⲣⲉ ⲟ]ⲩ̣ⲁⲧ̣[ϣⲉϫ]ⲉ ⲁⲣ̣ⲁ̣[ϥ ⲡ]ⲉ̣ [ⲁ]‐ <text:line-break/><text:soft-page-break/><text:span text:style-name="T1"> </text:span><text:span text:style-name="T2">(25/30) </text:span> ⲡ̣ⲧ̣ⲏ̣[ⲣ̅ϥ̅] ⲙ̅ⲡ̣ⲧⲏⲣ̅ϥ̅ ⲁ̣ⲩⲱ ⲡⲧⲁϫⲣ[ⲟ] <text:line-break/><text:span text:style-name="T1"> </text:span><text:span text:style-name="T2">(25/31) </text:span> ⲙ̅ⲛ̅ [ⲧϩⲩ]ⲡ̣ⲟⲥⲧⲁⲥⲓⲥ ⲙ̣̅ⲡⲧⲏⲣ̅ϥ̅ ⲡⲕ̣[ⲁ]‐ <text:line-break/><text:span text:style-name="T1"> </text:span><text:span text:style-name="T2">(25/32) </text:span> ⲧⲁⲡ[ⲉⲧⲁⲥ]ⲙⲁ ⲛ̅ⲥ̣ⲓ̣ⲅ̣[ⲏ]· ⲡⲁⲣ̣ⲭⲓ̣ⲉ̣‐ <text:line-break/><text:span text:style-name="T1"> </text:span><text:span text:style-name="T2">(25/33) </text:span> ⲣ̣ⲉⲩ̣[ⲥ ⲡⲉ ⲙ̅ⲙⲏ]ⲉ ⲡ̣[ⲉⲉⲓ ⲉⲧⲉⲩⲛ]ⲧ̣[ⲉϥ ⲙ̅]‐ <text:line-break/><text:span text:style-name="T1"> </text:span><text:span text:style-name="T2">(25/34) </text:span> ⲙ̣ⲉⲩ ⲛ̅ⲧⲉⲝⲟ̣ⲩ̣ⲥⲓⲁ ⲙ̣̅ⲃⲱⲕ ⲁϩⲟⲩⲛ ⲁ‐ <text:line-break/><text:span text:style-name="T1"> </text:span><text:span text:style-name="T2">(25/35) </text:span> ⲛⲉ̣ⲧ̣ⲟⲩⲁⲁϥ ⲛ̅ⲛⲉⲧⲟⲩⲁⲁϥ̅· ⲉϥⲟⲩ‐ <text:line-break/><text:span text:style-name="T1"> </text:span><text:span text:style-name="T2">(25/36) </text:span> [ⲱ]ⲛϩ ⲙ̅ⲙⲉⲛ ⲁϩⲟⲩⲛ ⲙ̅ⲡⲉⲁⲩ ⲛ̅‐ <text:line-break/><text:span text:style-name="T1"> </text:span><text:span text:style-name="T2">(25/37) </text:span> [ⲛ]ⲁⲓⲱⲛ ⲉϥⲉⲓⲛⲉ ⲛ̅ⲇⲉ ⲁⲃⲁⲗ ⲛ̅ⲧ‐ <text:line-break/><text:span text:style-name="T1"> </text:span><text:span text:style-name="T2">(25/38) </text:span> ⲭ̣ⲟⲣⲏⲅⲓⲁ ⲁⲩ〈ⲥϯ〉ⲛⲟⲩⲃⲉ· ⲧⲁⲛⲁⲧⲟⲗⲏ <text:line-break/><text:span text:style-name="T1"> </text:span><text:span text:style-name="T2">(26/17) </text:span> (Lines 1--17 lacking) <text:line-break/><text:span text:style-name="T1"> </text:span><text:span text:style-name="T2">(26/18) </text:span> [ⲉⲧ]ⲛ̅ϩⲣ̣[ⲏⲓ̈ ⲛ̅ϩⲏⲧ̅ϥ̅ ⲛ̅ⲧⲁϥ ⲡⲉ ⲡⲉ]ⲛ̣‐ <text:line-break/><text:span text:style-name="T1"> </text:span><text:span text:style-name="T2">(26/19) </text:span> [ⲧ]ⲁ̣ϥⲟⲩⲁⲛ̣[ϩ̅ϥ̅ ⲁⲃⲁⲗ] ⲉ̣ⲛ̣[ⲧⲁϥ]ⲡ̣ⲉ ⲡ‐ <text:line-break/><text:span text:style-name="T1"> </text:span><text:span text:style-name="T2">(26/20) </text:span> [ⲁⲣ]ⲭ̣ⲁ̣ⲓⲟⲛ ⲛ̣̅[ⲣ̅ⲡⲉⲉⲓ] ⲁⲩⲱ [ⲡ]ⲉ̣ϩⲟ ⲙ̅‐ <text:line-break/><text:span text:style-name="T1"> </text:span><text:span text:style-name="T2">(26/21) </text:span> [ⲡⲧⲏ]ⲣ̣̅̅ϥ̅ ⲁⲩⲱ̣ [ⲛⲉ]ϥ̣ ⲉⲙⲁϩⲧ̣ⲉ̣ ⲙ̅ⲡⲧⲏ‐ <text:line-break/><text:span text:style-name="T1"> </text:span><text:span text:style-name="T2">(26/22) </text:span> [ⲣ̅ϥ̅ ⲡⲏ] ⲉ̣ⲧϫⲁⲥⲓ̣ [ⲁⲡ]ⲧ̣ⲏⲣ̅ϥ̣̅ [ⲁ]ⲛ̣ⲉ̣ⲉ̣ⲓ ⲙ̅ⲙⲉⲛ̣ <text:line-break/><text:span text:style-name="T1"> </text:span><text:span text:style-name="T2">(26/23) </text:span> [ⲧⲉⲩⲟ] ⲡ̣ⲉⲭⲣⲏⲥ̣ⲧ̣ⲟⲥ ⲁ̣[ⲃⲁⲗ ⲁⲧⲣ̅ϥ̅ <text:line-break/><text:span text:style-name="T1"> </text:span><text:span text:style-name="T2">(26/24) </text:span> [ⲧⲉϩⲁⲥ] ⲛ̅ⲑⲉ ⲛ̅ⲧⲁⲩⲧⲉϩ̣[ⲁⲩ ϩⲁⲧⲉϩⲏ] <text:line-break/><text:span text:style-name="T1"> </text:span><text:span text:style-name="T2">(26/25) </text:span> [ⲛ̅ⲧⲉⲥϭⲓ]ⲛ̅ⲛ̅ⲉⲓ ⲁⲡ̣[ⲓⲧⲛ̅ ⲥⲉϫⲟⲩ ⲇⲉ] <text:line-break/><text:span text:style-name="T1"> </text:span><text:span text:style-name="T2">(26/26) </text:span> [ⲙ̅ⲙⲁϥ̅] ⲁ̣ⲣⲁϥ̅ ϫⲉ [ <text:line-break/><text:span text:style-name="T1"> </text:span><text:span text:style-name="T2">(26/27) </text:span> [ 10+- ].̅[ <text:line-break/><text:span text:style-name="T1"> </text:span><text:span text:style-name="T2">(26/28) </text:span> (One line lacking) <text:line-break/><text:span text:style-name="T1"> </text:span><text:span text:style-name="T2">(26/29) </text:span> [...ⲉϥⲟⲩⲁⲛ̅ϩ̅ ⲁⲃ]ⲁ̣ⲗ̣ [ⲉⲛ ⲁⲗⲗⲁ ⲟⲩⲁ]‐ <text:line-break/><text:span text:style-name="T1"> </text:span><text:span text:style-name="T2">(26/30) </text:span> ϩ̣[ⲟⲣⲁⲧ]ⲟⲥ ⲁⲣ̣[ⲁⲩ ⲡ]ⲉ ⲉⲩ̣[ϭⲱ ϩⲙ̅] ⲡ̣ϩⲟ‐ <text:line-break/><text:span text:style-name="T1"> </text:span><text:span text:style-name="T2">(26/31) </text:span> ⲣⲟⲥ ⲁⲩⲱ ⲟⲩⲛ̣̅ⲧⲉϥ̅ ⲙ̣̅ⲙ̣[ⲉⲩ ⲛ]ϥ̣̅ⲧⲟⲉ <text:line-break/><text:span text:style-name="T1"> </text:span><text:span text:style-name="T2">(26/32) </text:span> ⲛ̅ϭⲁⲙ ⲟⲩⲣⲉⲥⲡⲱⲣ̅ϫ̅ ⲙ[ⲛ̅ ⲟ]ⲩ̣ⲣⲉⲥ‐ <text:line-break/><text:span text:style-name="T1"> </text:span><text:span text:style-name="T2">(26/33) </text:span> [ⲧ]ⲁ̣ϫ̅ⲣ̅ⲟ̣ ⲟⲩⲣ̣ⲉ̣→ⲥ←⟦ϥ̣⟧ϯ ⲙⲟⲣⲫⲏ̣ [ⲁ]ⲩ̣ⲱ ⲟⲩ‐ <text:line-break/><text:span text:style-name="T1"> </text:span><text:span text:style-name="T2">(26/34) </text:span> ⲣ̣[ⲉⲥϫⲡⲉ ⲟⲩⲥⲓⲁ· ⲁⲛⲁⲛ ⲟⲩⲁⲉⲉⲧ]ⲛ̣̅ <text:line-break/><text:span text:style-name="T1"> </text:span><text:span text:style-name="T2">(26/35) </text:span> ⲙⲏ ⲉⲛⲉ ⲉⲓϣⲡⲉ 〈ⲉ〉ⲛ̣̅ⲁ̣ⲣ̣̅ⲛⲟⲉⲓ ⲛ̣̅ <text:line-break/><text:span text:style-name="T1"> </text:span><text:span text:style-name="T2">(26/36) </text:span> ⲛⲉⲩⲡⲣⲟⲥⲱⲡⲟⲛ ⲙ̅ⲛ̅ ⲡⲭⲣⲟ̣ⲛⲟⲥ <text:line-break/><text:span text:style-name="T1"> </text:span><text:span text:style-name="T2">(26/37) </text:span> ⲁⲩⲱ ⲛ̅ⲧⲟⲡⲟⲥ ⲛⲉⲉⲓ ⲛ̅ⲧⲁϩⲁⲛ̣ <text:line-break/><text:span text:style-name="T1"> </text:span><text:span text:style-name="T2">(26/38) </text:span> ⲉⲓⲛⲉ ⲁⲣϫⲟⲩ ⲁⲃⲁⲗ ϫⲉ ⲁϩⲟⲩⲥ.[ <text:line-break/><text:span text:style-name="T1"> </text:span><text:span text:style-name="T2">(27/15) </text:span> (Lines 1--15 lacking) <text:line-break/><text:span text:style-name="T1"> </text:span><text:span text:style-name="T2">(27/16) </text:span> [ 14+- ]ⲉϫ[ <text:line-break/><text:span text:style-name="T1"> </text:span><text:span text:style-name="T2">(27/17) </text:span> [ 13+- ]ⲛ̅ⲥⲉⲥ[ <text:line-break/><text:span text:style-name="T1"> </text:span><text:span text:style-name="T2">(27/18) </text:span> [ 10+- ⲁⲃ]ⲁ̣ⲗ ϩ̅ⲛ̅ ⲛⲓⲙ̣[ⲁ] <text:line-break/><text:span text:style-name="T1"> </text:span><text:span text:style-name="T2">(27/19) </text:span> [ 12+- ]ⲡ̣· ⲧⲁⲅⲁ̣ⲡ̣ⲏ̣[ <text:line-break/><text:span text:style-name="T1"> </text:span><text:span text:style-name="T2">(27/20) </text:span> [ 8+- ]ⲡ̣ⲁϩ̅ⲧ̅ ⲁ̣ⲃⲁⲗ [ <text:line-break/><text:span text:style-name="T1"> </text:span><text:span text:style-name="T2">(27/21) </text:span> [....ⲡ]ⲡ̣ⲗ̣ⲏⲣⲱⲙⲁ ⲧⲏ̣[5̅0̅ⲣ̅]̅ϥ̣̅̅50[ <text:line-break/><text:span text:style-name="T1"> </text:span><text:span text:style-name="T2">(27/22) </text:span> [ 6+- ]ⲡⲉϭⲱ̣ ⲣ̅ϩⲩⲡ̣[ⲟⲙⲉ]‐ <text:line-break/><text:span text:style-name="T1"> </text:span><text:span text:style-name="T2">(27/23) </text:span> [ⲛⲉ ⲛ̅ⲟⲩⲁ]ⲉⲓϣ ⲛⲓⲙ ⲁⲩⲱ̣[ <text:line-break/><text:span text:style-name="T1"> </text:span><text:span text:style-name="T2">(27/24) </text:span> [ 6+- ].ⲕⲁⲓ ⲅⲁ̣ⲣ ⲁⲃ̣[ⲁⲗ ϩ̅ⲛ̅ <text:line-break/><text:span text:style-name="T1"> </text:span><text:span text:style-name="T2">(27/25) </text:span> [ 7+- ].ⲡ̣ⲟⲩⲁ̣ⲉ̣ⲓ̣ϣ̣[ <text:line-break/><text:span text:style-name="T1"> </text:span><text:span text:style-name="T2">(27/26) </text:span> [ 6+- ].ⲉⲓ ϩⲟⲩⲟ̣[.].[ <text:line-break/><text:span text:style-name="T1"> </text:span><text:span text:style-name="T2">(27/27) </text:span> (One line lacking) <text:line-break/><text:span text:style-name="T1"> </text:span><text:span text:style-name="T2">(27/28) </text:span> [ 9+- ]ϣ̣[ 7+- ]ⲛ̣[ <text:line-break/><text:span text:style-name="T1"> </text:span><text:span text:style-name="T2">(27/29) </text:span> [ⲉⲧⲉ ⲧⲉⲉⲓ ⲧⲉ] ⲧ̣ⲁⲡⲟⲇ̣ⲉ̣ⲓⲝⲓ̣ⲥ̣ ⲛ̅ⲧ̅ϥ̅[ⲛⲁϭ] <text:line-break/><text:span text:style-name="T1"> </text:span><text:span text:style-name="T2">(27/30) </text:span> [ⲛ̅ⲁⲅⲁⲡⲏ ⲉⲧ]ⲃ̣ⲉ ⲉⲩ ⲛ̣̅ⲇⲉ ϫⲉ ⲟⲩⲣⲉⲥ̣‐ <text:line-break/><text:soft-page-break/><text:span text:style-name="T1"> </text:span><text:span text:style-name="T2">(27/31) </text:span> [ⲡⲱⲣ]ϫ̣̅ ⲁ̣ⲃⲁⲗ ⲙ̅ⲛ̅ ⲟⲩⲣⲉⲥⲧⲁϫⲣⲟ <text:line-break/><text:span text:style-name="T1"> </text:span><text:span text:style-name="T2">(27/32) </text:span> [ⲁⲩ]ⲱ̣ ⲟⲩⲣⲉⲥϫⲡⲉ ⲟⲩⲥⲓⲁ ⲙ̅ⲛ̅ ⲟⲩⲣⲉⲥ‐ <text:line-break/><text:span text:style-name="T1"> </text:span><text:span text:style-name="T2">(27/33) </text:span> [ϯ ⲙ]ⲟⲣⲫ̣ⲏ ⲛ̅ⲑⲉ ⲛ̅ⲧⲁϩⲁϩ̅ⲛ̅ⲕⲁⲩⲉ <text:line-break/><text:span text:style-name="T1"> </text:span><text:span text:style-name="T2">(27/34) </text:span> [ϫⲟⲟ]ⲥ̣ ⲥ̣[ⲉ]ϫ̣ⲟⲩ ⲛ̅ⲅⲁⲣ ⲙ̅ⲙⲁϥ̅ ⲁⲡϩⲟ‐ <text:line-break/><text:span text:style-name="T1"> </text:span><text:span text:style-name="T2">(27/35) </text:span> [ⲣⲟ]ⲥ̣ ϫⲉ̣ [ⲟⲩ]ⲛ̣ⲧ̣ⲉϥ̅ ⲙ̅ⲙⲉⲩ ⲛ̅ϭⲁⲙ <text:line-break/><text:span text:style-name="T1"> </text:span><text:span text:style-name="T2">(27/36) </text:span> [ⲥ]ⲛ̣̅ⲧⲉ ⲟ[ⲩⲣ]ⲉ̣ⲥⲡⲱⲣ̅[̅2̅̅̅ϫ̅〉 ⲁⲃⲁⲗ ⲁⲩⲱ <text:line-break/><text:span text:style-name="T1"> </text:span><text:span text:style-name="T2">(27/37) </text:span> [ⲟ]ⲩ̣ⲣⲉⲥ̣[ⲧⲁ]ϫ̣ⲣⲟ ⲉⲡⲉⲓ ⲥⲡⲱⲣϫ ⲙ̅‐ <text:line-break/><text:span text:style-name="T1"> </text:span><text:span text:style-name="T2">(27/38) </text:span> [ⲡ]ⲃⲩ[ⲑⲟⲥ] ⲁⲃⲁⲗ ϩ̅ⲛ̅ 〈ⲛ̅〉ⲁⲓⲱⲛ ϫⲉⲕⲁ‐ <text:line-break/><text:span text:style-name="T1"> </text:span><text:span text:style-name="T2">(28/1) </text:span> [ⲥⲉ <text:line-break/><text:span text:style-name="T1"> </text:span><text:span text:style-name="T2">(28/15) </text:span> (Lines 1--15 lacking) <text:line-break/><text:span text:style-name="T1"> </text:span><text:span text:style-name="T2">(28/16) </text:span> [..].[ <text:line-break/><text:span text:style-name="T1"> </text:span><text:span text:style-name="T2">(28/17) </text:span> ⲛ̣ⲛ ⲧ̣[ <text:line-break/><text:span text:style-name="T1"> </text:span><text:span text:style-name="T2">(28/18) </text:span> ⲛⲉⲉⲓ ϭ[ⲉ <text:line-break/><text:span text:style-name="T1"> </text:span><text:span text:style-name="T2">(28/19) </text:span> ⲉⲓ ⲛ̅ⲟⲩ.[ <text:line-break/><text:span text:style-name="T1"> </text:span><text:span text:style-name="T2">(28/20) </text:span> [.].ⲛ. ⲙ̅ⲡⲃ[ⲩⲑⲟⲥ <text:line-break/><text:span text:style-name="T1"> </text:span><text:span text:style-name="T2">(28/21) </text:span> [ⲅ]ⲁ̣ⲣ [ⲧ]ⲉ̣ ⲧⲙⲟⲣ̣ⲫ̣ⲏ̣ [.].[ <text:line-break/><text:span text:style-name="T1"> </text:span><text:span text:style-name="T2">(28/22) </text:span> [...].ⲉ̣ ⲙ̅ⲡⲓⲱⲧ̣ ⲛ̅ⲧ̣[ⲙⲏⲉ <text:line-break/><text:span text:style-name="T1"> </text:span><text:span text:style-name="T2">(28/23) </text:span> [ⲁⲩϫⲟ]ⲟⲥ ϫⲉ ⲡⲉⲭⲣⲏ̣[ⲥⲧⲟⲥ <text:line-break/><text:span text:style-name="T1"> </text:span><text:span text:style-name="T2">(28/24) </text:span> [....].ⲉ ⲡⲉⲡⲛⲉⲩⲙ̣[ⲁ <text:line-break/><text:span text:style-name="T1"> </text:span><text:span text:style-name="T2">(28/25) </text:span> [.....] ⲙ̅ⲡ̣ⲙⲟⲛ[ⲟⲅⲉⲛⲏⲥ <text:line-break/><text:span text:style-name="T1"> </text:span><text:span text:style-name="T2">(28/26) </text:span> [....]ⲉ̣ⲧ̣ⲉ̣ [ⲟ]ⲩⲛⲧ̣ⲉ̣[ <text:line-break/><text:span text:style-name="T1"> </text:span><text:span text:style-name="T2">(28/27) </text:span> [.....].[.]....[ <text:line-break/><text:span text:style-name="T1"> </text:span><text:span text:style-name="T2">(28/28) </text:span> (One blank line) <text:line-break/><text:span text:style-name="T1"> </text:span><text:span text:style-name="T2">(28/29) </text:span> [.]ⲧ̣ ⲟ[ⲩⲧⲉⲧⲛⲁ]ϣⲱ̣ⲥ̣ [ⲧⲉ ⲙ̅ⲛ̅ ⲟⲩⲁ]‐ <text:line-break/><text:span text:style-name="T1"> </text:span><text:span text:style-name="T2">(28/30) </text:span> ⲛ̣ⲁⲅⲕⲁⲓⲟⲛ̣ ⲁⲧ̅ⲣ̅ⲛ̅[ϣⲓⲛⲉ ϩ̅ⲛ̅] <text:line-break/><text:span text:style-name="T1"> </text:span><text:span text:style-name="T2">(28/31) </text:span> ⲟⲩⲱⲣϫ ⲛ̣̅ϩⲟⲩⲟ ⲙ̣ⲛ̣̅ [ⲟⲩϭⲱ] <text:line-break/><text:span text:style-name="T1"> </text:span><text:span text:style-name="T2">(28/32) </text:span> ⲛ̅ⲥⲁ ⲛⲅⲣⲁⲫⲁⲩⲉⲓⲉ ⲁⲩⲱ̣ [ⲛⲉⲧ]‐ <text:line-break/><text:span text:style-name="T1"> </text:span><text:span text:style-name="T2">(28/33) </text:span> ⲧⲉⲩⲟ ⲛ̅ⲛ̅ⲛⲟⲏⲙⲁ ⲉⲧⲃⲉ ⲡ̣[ⲉⲉⲓ] <text:line-break/><text:span text:style-name="T1"> </text:span><text:span text:style-name="T2">(28/34) </text:span> ⲛ̅ⲅⲁⲣ ⲥⲉϫⲟⲩ ⲙ̅ⲙⲁϥ̣ ⲛ̣̅ϭ̣[ⲓ] <text:line-break/><text:span text:style-name="T1"> </text:span><text:span text:style-name="T2">(28/35) </text:span> ⲛⲁⲣⲭⲁⲓⲟⲥ ϫⲉ ⲛ̅ⲧⲁ̣[ⲩ]ⲧⲉⲩ̣ⲁ̣[ⲩ] <text:line-break/><text:span text:style-name="T1"> </text:span><text:span text:style-name="T2">(28/36) </text:span> ⲁⲃⲁⲗ ϩⲓⲧ̅ⲙ̅ ⲡⲛⲟⲩⲧ̣[ⲉ] ⲙ̣ⲁⲣ[ⲛ̅] <text:line-break/><text:span text:style-name="T1"> </text:span><text:span text:style-name="T2">(28/37) </text:span> ⲙ̅ⲙⲉ ⲛ̅ⲇⲉ ⲁⲧⲉϥⲙ̅[̅ⲛ̅ⲧ̅]ⲣ̅ⲙ̅ⲙ[ⲁ]‐ <text:line-break/><text:span text:style-name="T1"> </text:span><text:span text:style-name="T2">(28/38) </text:span> ⲟ ⲛ̅ⲁⲧϭⲛ̅ⲣⲉⲧⲥ̅ ⲁϥ̣[ⲟ]ⲩ̣ⲱϣ[ⲉ] <text:line-break/><text:span text:style-name="T1"> </text:span><text:span text:style-name="T2">(29/16) </text:span> (Lines 1--16 lacking) <text:line-break/><text:span text:style-name="T1"> </text:span><text:span text:style-name="T2">(29/17) </text:span> [ 16+- ].ⲩ̣[ <text:line-break/><text:span text:style-name="T1"> </text:span><text:span text:style-name="T2">(29/18) </text:span> [ 15+- ⲇ]ⲟ̣ⲩⲗⲉⲓ̣[ⲁ] <text:line-break/><text:span text:style-name="T1"> </text:span><text:span text:style-name="T2">(29/19) </text:span> [ 15+- ]ⲏⲡ ⲁϯ <text:line-break/><text:span text:style-name="T1"> </text:span><text:span text:style-name="T2">(29/20) </text:span> [ 12+- ⲙ̅]ⲡ̣[ⲉ]ϥ̣ϣⲱⲡⲉ <text:line-break/><text:span text:style-name="T1"> </text:span><text:span text:style-name="T2">(29/21) </text:span> [ 12+- ]ⲣⲉ ⲙ̅ⲡ̣[ⲉ]ⲩⲃⲓⲟⲥ <text:line-break/><text:span text:style-name="T1"> </text:span><text:span text:style-name="T2">(29/22) </text:span> [ 7+- ⲥⲉϭⲱ]ϣ̅ⲧ̅ ϩ̅ⲛ̅ [ⲟⲩ]ⲱⲣ̅ϫ̅ <text:line-break/><text:span text:style-name="T1"> </text:span><text:span text:style-name="T2">(29/23) </text:span> [ⲁⲡⲃⲓⲃⲗⲓ]ⲇ̣ⲓ̣ⲟⲛ ⲛ̅ⲧⲅⲛ̣ⲱ̣ⲥⲓⲥ· <text:line-break/><text:span text:style-name="T1"> </text:span><text:span text:style-name="T2">(29/24) </text:span> [ⲥⲉϭⲱϣ̅ⲧ̅] ⲛ̣̅ⲇⲉ ⲁϩⲟⲩⲛ ⲁⲡ̣ⲡ̣ⲣⲟ̣[ⲥⲱ]‐ <text:line-break/><text:span text:style-name="T1"> </text:span><text:span text:style-name="T2">(29/25) </text:span> [ⲡⲟⲛ ⲛ̅ⲛⲉⲩ]ⲉ̣ⲣⲏⲩ· ⲧⲧⲉⲧ̣[ⲣⲁⲥ ⲉ]‐ <text:line-break/><text:span text:style-name="T1"> </text:span><text:span text:style-name="T2">(29/26) </text:span> [ⲧ̅ⲙ̅ⲙⲉⲩ ⲁⲥⲧⲉ]ⲩ̣ⲟ ⲁⲃⲁ̣[ⲗ] ⲛ̣̅[ⲧⲧⲉⲧ]ⲣ̣[ⲁⲥ] <text:line-break/><text:span text:style-name="T1"> </text:span><text:span text:style-name="T2">(29/27) </text:span> [ⲉⲧⲉ ⲧⲉⲉⲓ ⲧⲉⲧ]ⲁ̣ⲡ̣ⲗ̣ⲟ̣[ⲅⲟⲥ ⲙ̅]̅ⲛ̣̅̅ ⲡⲱ̣‐ <text:line-break/><text:span text:style-name="T1"> </text:span><text:span text:style-name="T2">(29/28) </text:span> [ⲛ]ϩ̣̅ [ⲁⲩⲱ ⲡⲣⲱⲙⲉ ⲙ̅ⲛ̅ ⲧ]ⲉ̣ⲕⲕ̣[ⲗⲏ]‐ <text:line-break/><text:span text:style-name="T1"> </text:span><text:span text:style-name="T2">(29/29) </text:span> [ⲥ]ⲓ̣ⲁ̣ [ⲡⲁⲧⲥⲱ]ⲱ̣ⲛⲧ̣ [ⲛ̅ⲇⲉ ⲁ]ϥ̣̅ⲧⲉⲩⲟ <text:line-break/><text:soft-page-break/><text:span text:style-name="T1"> </text:span><text:span text:style-name="T2">(29/30) </text:span> ⲁⲃⲁ̣[ⲗ ⲙ̅ⲡⲗ]ⲟⲅⲟⲥ ⲙ̅[̅ⲛ̅ ⲡ]ⲱ̣ⲛϩ· ⲡⲗⲟ‐ <text:line-break/><text:span text:style-name="T1"> </text:span><text:span text:style-name="T2">(29/31) </text:span> ⲅ̣ⲟⲥ ⲙ̣̅[ⲙⲉ]ⲛ̣ [ⲁ]ⲡⲉⲁⲩ ⲙ̅[ⲡ]ⲁⲧϣⲉ‐ <text:line-break/><text:span text:style-name="T1"> </text:span><text:span text:style-name="T2">(29/32) </text:span> ϫⲉ ⲁ[ⲣⲁ]ϥ̣ ⲡⲱⲛ̅ϩ̅ ⲛ̅ⲇ[ⲉ] ⲁⲡⲉⲁⲩ ⲛ̅‐ <text:line-break/><text:span text:style-name="T1"> </text:span><text:span text:style-name="T2">(29/33) </text:span> ⲧⲥⲓ[ⲅⲏ].’ ⲡⲣⲱⲙⲉ ⲛ̅ⲇⲉ̣ ⲁⲡⲉϥ̅ⲉ‐ <text:line-break/><text:span text:style-name="T1"> </text:span><text:span text:style-name="T2">(29/34) </text:span> ⲁ̣ⲩ [ⲙ̅ⲙ]ⲓ̣ⲛ ⲙ̅ⲙⲁϥ̅ ⲧⲉ[ⲕ]ⲕⲗⲏⲥⲓⲁ <text:line-break/><text:span text:style-name="T1"> </text:span><text:span text:style-name="T2">(29/35) </text:span> ⲛ̅ⲇⲉ [ⲁ]ⲡ̣ⲉⲁⲩ ⲛ̅ⲧⲙⲏⲉ̣ ⲧⲉⲉⲓ ϭⲉ <text:line-break/><text:span text:style-name="T1"> </text:span><text:span text:style-name="T2">(29/36) </text:span> ⲧⲉ ⲧⲧⲉ̣[ⲧⲣ]ⲁ̣ⲥ ⲉⲧⲟⲩϫⲡⲟ ⲙ̅ⲙⲁⲥ <text:line-break/><text:span text:style-name="T1"> </text:span><text:span text:style-name="T2">(29/37) </text:span> ⲕ̣ⲁⲧⲁ [ⲡⲧⲁ]ⲛⲧ̅ⲛ̅ ⲛ̅⟦ⲡ⟧ϯⲁⲧϫⲡⲁ⟦ϥ̅⟧ⲥ <text:line-break/><text:span text:style-name="T1"> </text:span><text:span text:style-name="T2">(29/38) </text:span> ⲁ̣ⲩⲱ [ⲧ]ⲧ̣ⲉⲧⲣⲁⲥ ⲉϣⲁⲣⲟⲩϫⲡⲁⲥ <text:line-break/><text:span text:style-name="T1"> </text:span><text:span text:style-name="T2">(30/15) </text:span> (Lines 1--15 lacking) <text:line-break/><text:span text:style-name="T1"> </text:span><text:span text:style-name="T2">(30/16) </text:span> ..ⲛ̣̅[ 10+- ⲧⲇⲉⲕⲁ ⲧⲁ]‐ <text:line-break/><text:span text:style-name="T1"> </text:span><text:span text:style-name="T2">(30/17) </text:span> ⲃ̣ⲁⲗ ϩⲙ̣̅ [ⲡⲗⲟⲅⲟⲥ ⲙ̅ⲛ̅ ⲡⲱⲱⲛ̅ϩ̅] <text:line-break/><text:span text:style-name="T1"> </text:span><text:span text:style-name="T2">(30/18) </text:span> ⲁⲩⲱ ⲧⲇ̣[ⲱⲇⲉⲕⲁⲥ ⲧⲁⲃⲁⲗ ϩ̅ⲙ̅ ⲡⲣⲱ]‐ <text:line-break/><text:span text:style-name="T1"> </text:span><text:span text:style-name="T2">(30/19) </text:span> ⲙⲉ ⲙ̅ⲛ̣̅̅ ⲧ̣[ⲉ]ⲕ̣[ⲕⲗⲏⲥⲓⲁ ⲁⲩϣⲱⲡⲉ ⲛ̅ⲟⲩ]‐ <text:line-break/><text:span text:style-name="T1"> </text:span><text:span text:style-name="T2">(30/20) </text:span> ⲧⲣⲓⲁⲕ̣[ⲟ]ⲛⲧⲁⲥ [ⲡⲁⲧⲉⲧⲣⲓⲁⲕⲟⲛ]‐ <text:line-break/><text:span text:style-name="T1"> </text:span><text:span text:style-name="T2">(30/21) </text:span> ⲧ̣ⲁⲥ ϭ̣ⲉ̣ ⲡⲉ ⲛ̅ⲛ[ⲁⲓⲱⲛ ⲉⲧϯⲕⲁⲣ]‐ <text:line-break/><text:span text:style-name="T1"> </text:span><text:span text:style-name="T2">(30/22) </text:span> [ⲡⲟ]ⲥ ⲉ[ϥⲁ]ⲃⲁⲗ ϩ̅ⲛ̅ ⲧ̣ⲉ̣ⲧ̣[ⲣⲓⲁⲕⲟⲛⲧⲁⲥ] <text:line-break/><text:span text:style-name="T1"> </text:span><text:span text:style-name="T2">(30/23) </text:span> [ⲥⲉ]ⲡ̣ⲏ̣ⲧ̣ ⲁϩⲟⲩⲛ ⲛ̅ⲕⲟ̣[ⲓⲛⲱⲛⲟⲥ] <text:line-break/><text:span text:style-name="T1"> </text:span><text:span text:style-name="T2">(30/24) </text:span> [ⲁⲗⲗⲁ ⲥ]ⲉⲉⲓ ⲁⲃⲁⲗ ⲛ̣̅[ⲟⲩⲱⲧ ⲉϥ]‐ <text:line-break/><text:span text:style-name="T1"> </text:span><text:span text:style-name="T2">(30/25) </text:span> ⲡ̣[ⲏⲧ 5̅0̅ϩ̅]̅ⲛ̣̅̅50 ⲛ̣[ⲁⲓ]ⲱⲛ̣ ⲙ̅[ⲛ̅ ⲛⲓⲁⲧ̣ϣⲁ]‐ <text:line-break/><text:span text:style-name="T1"> </text:span><text:span text:style-name="T2">(30/26) </text:span> ⲡⲟⲩ [ⲁⲩⲱ] ⲛ̣ⲓⲁⲧϣ̣[ⲁⲡⲟⲩ ⲛ̅ⲧⲁⲣⲟⲩ]‐ <text:line-break/><text:span text:style-name="T1"> </text:span><text:span text:style-name="T2">(30/27) </text:span> ϭ̣ⲱ[ϣ̅ⲧ̅ ⲁⲣⲁϥ ⲁⲩϯ ⲉⲁⲩ ⲁⲡⲛ]ⲟ̣[ⲩⲥ] <text:line-break/><text:span text:style-name="T1"> </text:span><text:span text:style-name="T2">(30/28) </text:span> ⲉ̣ⲡⲉⲓ̣ [ⲟⲩⲁⲧϣ]ⲁ̣ⲡ̣[ϥ̅ ⲡⲉ ⲉϥϣ]ⲟⲟ̣[ⲡ] <text:line-break/><text:span text:style-name="T1"> </text:span><text:span text:style-name="T2">(30/29) </text:span> ϩ̅ⲙ̅ ⲡⲡ̣[ⲗⲏⲣ]ⲱ̣ⲙⲁ ⲁⲗ̣[ⲗⲁ ⲁⲥ]ⲉ̣ⲓⲛⲉ̣ <text:line-break/><text:span text:style-name="T1"> </text:span><text:span text:style-name="T2">(30/30) </text:span> ⲙ̅ⲙⲉⲛ ⲁ̣[ⲃⲁ]ⲗ̣ ⲛ̅ϭⲓ [ⲧ]ⲇ̣[ⲉⲕⲁ] ⲧⲁⲃⲁ̣[ⲗ] <text:line-break/><text:span text:style-name="T1"> </text:span><text:span text:style-name="T2">(30/31) </text:span> ϩ̅ⲙ̅ ⲡⲗⲟ̣[ⲅ]ⲟ̣ⲥ ⲙ̅ⲛ̅ ⲡⲱⲱ̣[ⲛ]ϩ ⲛ̅ϩⲛ̅‐ <text:line-break/><text:span text:style-name="T1"> </text:span><text:span text:style-name="T2">(30/32) </text:span> ⲇⲉⲕⲁ ϩⲱ̣ⲥ ⲁⲧⲣⲉⲡⲡⲗ[ⲏⲣ]ⲱ̣ⲙⲁ <text:line-break/><text:span text:style-name="T1"> </text:span><text:span text:style-name="T2">(30/33) </text:span> ϣⲱⲡⲉ̣ ⲛ̅ⲟⲩϩⲉⲕⲁⲧⲟⲛ[ⲧⲁⲥ] ⲁⲩⲱ <text:line-break/><text:span text:style-name="T1"> </text:span><text:span text:style-name="T2">(30/34) </text:span> ⲧⲇⲱⲇ[ⲉ]ⲕⲁⲥ ⲧⲁⲃⲁⲗ ϩ̅ⲙ̣̅̅ ⲡ̣ⲣ̣ⲱⲙ̣[ⲉ] <text:line-break/><text:span text:style-name="T1"> </text:span><text:span text:style-name="T2">(30/35) </text:span> ⲙ̅ⲛ̅ ⲧⲉⲕⲕⲗⲏⲥⲓⲁ ⲁⲥⲉ[ⲓⲛⲉ] ⲁ̣ⲃⲁⲗ ⲁⲥ[ⲣ̅]‐ <text:line-break/><text:span text:style-name="T1"> </text:span><text:span text:style-name="T2">(30/36) </text:span> ⲡⲙⲁⲁⲃ ϩⲱⲥ ⲁⲧⲣⲉ[ⲧϣ̅]̅ⲛ̣̅̅ⲧ̣̅̅ ϣⲉ̣ <text:line-break/><text:span text:style-name="T1"> </text:span><text:span text:style-name="T2">(30/37) </text:span> ⲥⲉ ϣⲱⲡⲉ ⲛ̅ⲡⲡⲗⲏ[ⲣⲱ]ⲙⲁ ⲛ̅ⲧ̣‐ <text:line-break/><text:span text:style-name="T1"> </text:span><text:span text:style-name="T2">(30/38) </text:span> ⲣⲁⲙⲡⲉ ⲁⲩⲱ ⲧⲣⲁⲙⲡ̣[ⲉ] ⲙ̣̅ⲡϫⲁⲉ̣ⲓ̣[ⲥ] <text:line-break/><text:span text:style-name="T1"> </text:span><text:span text:style-name="T2">(31/14) </text:span> (Lines 1--14 lacking) <text:line-break/><text:span text:style-name="T1"> </text:span><text:span text:style-name="T2">(31/15) </text:span> [ 20+- ].[ <text:line-break/><text:span text:style-name="T1"> </text:span><text:span text:style-name="T2">(31/16) </text:span> [ 20+- ]ⲃⲁ[ⲗ] <text:line-break/><text:span text:style-name="T1"> </text:span><text:span text:style-name="T2">(31/17) </text:span> [ 20+- ]ⲛ̅. <text:line-break/><text:span text:style-name="T1"> </text:span><text:span text:style-name="T2">(31/18) </text:span> [ 16+- ⲧⲉⲗⲉ]ⲓ̣ⲟⲥ <text:line-break/><text:span text:style-name="T1"> </text:span><text:span text:style-name="T2">(31/19) </text:span> [ 15+- ⲧ]ⲉ̣ⲗⲉⲓⲟⲛ <text:line-break/><text:span text:style-name="T1"> </text:span><text:span text:style-name="T2">(31/20) </text:span> [ 13+- ⲁⲩ]ⲱ̣ ⲕⲁⲧⲁ ⲫⲟ̣ <text:line-break/><text:span text:style-name="T1"> </text:span><text:span text:style-name="T2">(31/21) </text:span> [ 14+- ]ⲁ̣ⲛ ⲡⲉ ⲁⲣ̣̅ <text:line-break/><text:span text:style-name="T1"> </text:span><text:span text:style-name="T2">(31/22) </text:span> [ 15+- ϩⲟ]ⲣ̣ⲟⲥ ⲁⲩⲱ̣ <text:line-break/><text:span text:style-name="T1"> </text:span><text:span text:style-name="T2">(31/23) </text:span> [ 18+- ]ϩ̣ⲟⲣⲟ̣[ⲥ] <text:line-break/><text:span text:style-name="T1"> </text:span><text:span text:style-name="T2">(31/24) </text:span> [ 18+- ]ⲛⲉ.[ <text:line-break/><text:span text:style-name="T1"> </text:span><text:span text:style-name="T2">(31/25) </text:span> [ 18+- ].[ <text:line-break/><text:span text:style-name="T1"> </text:span><text:span text:style-name="T2">(31/26) </text:span> (One line lacking) <text:line-break/><text:span text:style-name="T1"> </text:span><text:span text:style-name="T2">(31/27) </text:span> [ 18+- ⲡ]ⲙ̣ⲉⲅⲉ[ⲑⲟⲥ] <text:line-break/><text:soft-page-break/><text:span text:style-name="T1"> </text:span><text:span text:style-name="T2">(31/28) </text:span> ⲉ̣ⲧ̣ϥ̣[ 14+- ]ⲛ̣̅ϯ5̅0̅ⲙ̅[̅ⲛ̅50] <text:line-break/><text:span text:style-name="T1"> </text:span><text:span text:style-name="T2">(31/29) </text:span> ⲧⲭⲣ̣[ⲏⲥⲧⲟⲥ 8+- ]ⲁϥ̅ ⲡⲱ̣‐ <text:line-break/><text:span text:style-name="T1"> </text:span><text:span text:style-name="T2">(31/30) </text:span> ⲱⲛ̣[ϩ̅ 7+- ]ⲛ̣[....]ϣ̣ⲱⲡ ϩⲓ‐ <text:line-break/><text:span text:style-name="T1"> </text:span><text:span text:style-name="T2">(31/31) </text:span> ⲥⲉ ⲡ̣[ 7+- ]ⲉ.[...]ⲧ̣ⲏ ϩⲓⲧ̅ⲙ̅ <text:line-break/><text:span text:style-name="T1"> </text:span><text:span text:style-name="T2">(31/32) </text:span> ⲫⲟ ⲧ̣[ 7+- ].ⲉⲓ̣[..ⲛ̅]̅ⲛ̣̅̅ⲁϩⲣⲉ <text:line-break/><text:span text:style-name="T1"> </text:span><text:span text:style-name="T2">(31/33) </text:span> ⲡⲡ[ⲗⲏⲣⲱⲙⲁ...]ⲁⲣ̣[..]ⲉ ⲛ̅ⲧⲁϥ̅ⲟⲩ‐ <text:line-break/><text:span text:style-name="T1"> </text:span><text:span text:style-name="T2">(31/34) </text:span> ⲁϣ̣[ϥ̅ 7+- ⲁⲩ]ⲱ̣ ⲁϥⲟⲩ̣ⲱϣⲉ <text:line-break/><text:span text:style-name="T1"> </text:span><text:span text:style-name="T2">(31/35) </text:span> ⲁⲃⲱ̣[ⲕ ⲁⲃⲁⲗ ϩ̅ⲛ̅] ⲧ̣ⲙⲁϩⲙⲁⲁⲃⲉ ⲉϥ‐ <text:line-break/><text:span text:style-name="T1"> </text:span><text:span text:style-name="T2">(31/36) </text:span> ϣⲟⲟⲡ [ⲛ̅ⲥⲩⲍⲩⲅ]ⲟⲥ· ⲙ̅ⲡⲣⲱⲙⲉ ⲙ̅ⲛ̅ <text:line-break/><text:span text:style-name="T1"> </text:span><text:span text:style-name="T2">(31/37) </text:span> ⲧⲉⲕⲕⲗⲏ̣[ⲥⲓⲁ ⲉⲧⲉ] ⲧ̣ⲉⲉⲓ ⲧⲉ ⲧⲥⲟⲫⲓⲁ ⲁⲣ̅‐ <text:line-break/><text:span text:style-name="T1"> </text:span><text:span text:style-name="T2">(31/38) </text:span> ⲧⲡⲉ ⲙ̅[ⲡⲙⲁⲁⲃ ⲛ̅ϥ̅]ⲛ̅ ⲡⲡⲗⲏⲣⲱⲙⲁ <text:line-break/><text:span text:style-name="T1"> </text:span><text:span text:style-name="T2">(32/13) </text:span> (Lines 1--13 lacking) <text:line-break/><text:span text:style-name="T1"> </text:span><text:span text:style-name="T2">(32/14) </text:span> [.].[ <text:line-break/><text:span text:style-name="T1"> </text:span><text:span text:style-name="T2">(32/15) </text:span> ⲟⲩ[ <text:line-break/><text:span text:style-name="T1"> </text:span><text:span text:style-name="T2">(32/16) </text:span> ⲡ̅ϥ̅[ <text:line-break/><text:span text:style-name="T1"> </text:span><text:span text:style-name="T2">(32/17) </text:span> ⲛ̅ⲇ̣[ⲉ ⲁⲩ]‐ <text:line-break/><text:span text:style-name="T1"> </text:span><text:span text:style-name="T2">(32/18) </text:span> ⲱ ⲁⲥ̣ϣ̣[ <text:line-break/><text:span text:style-name="T1"> </text:span><text:span text:style-name="T2">(32/19) </text:span> ⲅⲟⲥ ⲉⲧⲉ[ <text:line-break/><text:span text:style-name="T1"> </text:span><text:span text:style-name="T2">(32/20) </text:span> ⲛⲓⲁ ⲙ̅ⲛ̣̅̅ <text:line-break/><text:span text:style-name="T1"> </text:span><text:span text:style-name="T2">(32/21) </text:span> ⲛ̅ⲅⲁⲣ ⲁ̣[ <text:line-break/><text:span text:style-name="T1"> </text:span><text:span text:style-name="T2">(32/22) </text:span> ⲙ̣̅ⲡⲧⲏ̣[ⲣ̅ϥ̅ <text:line-break/><text:span text:style-name="T1"> </text:span><text:span text:style-name="T2">(32/23) </text:span> [.]ϯⲙ[ <text:line-break/><text:span text:style-name="T1"> </text:span><text:span text:style-name="T2">(32/24) </text:span> [.].ⲟ.[ <text:line-break/><text:span text:style-name="T1"> </text:span><text:span text:style-name="T2">(32/25) </text:span> [ <text:line-break/><text:span text:style-name="T1"> </text:span><text:span text:style-name="T2">(32/26) </text:span> ⲫ̣ⲟ̣[ <text:line-break/><text:span text:style-name="T1"> </text:span><text:span text:style-name="T2">(32/27) </text:span> ⲁⲩⲣ̅.[ <text:line-break/><text:span text:style-name="T1"> </text:span><text:span text:style-name="T2">(32/28) </text:span> ⲛ̅ⲇⲉ[ 15+- ].ⲩ̣.ⲉ̣ <text:line-break/><text:span text:style-name="T1"> </text:span><text:span text:style-name="T2">(32/29) </text:span> ⲧⲟⲩⲡ[ 14+- ]ⲡ̣ⲧ̣ⲏ‐ <text:line-break/><text:span text:style-name="T1"> </text:span><text:span text:style-name="T2">(32/30) </text:span> ⲣ̅ϥ̅ ⲛ̅ϩ[ 14+- ]ϥ̅ ⲁⲩ‐ <text:line-break/><text:span text:style-name="T1"> </text:span><text:span text:style-name="T2">(32/31) </text:span> ⲱ ⲛ̅ⲧⲁϥ̣[....]..[ 8+- ]ⲉ ⲁϥ‐ <text:line-break/><text:span text:style-name="T1"> </text:span><text:span text:style-name="T2">(32/32) </text:span> ⲉⲓⲣⲉ ⲛ̅.[....]ⲡ.[ 6+- ]ⲡ̣ⲙⲉⲩ‐ <text:line-break/><text:span text:style-name="T1"> </text:span><text:span text:style-name="T2">(32/33) </text:span> ⲉ ⲙ̅ⲛ̅ ⲛ̅[....]..[....ⲡⲡⲗ]ⲏ̣ⲣⲱ‐ <text:line-break/><text:span text:style-name="T1"> </text:span><text:span text:style-name="T2">(32/34) </text:span> ⲙⲁ ϩⲓⲧ̅ⲙ̅ ⲡ̣[ⲗ]ⲟⲅ̣ⲟ̣[ⲥ 6+- ]ⲛ̣̅ⲧⲉϥ‐ <text:line-break/><text:span text:style-name="T1"> </text:span><text:span text:style-name="T2">(32/35) </text:span> ⲥⲁⲣⲝ ⲛ̣ⲉⲉⲓ ϭⲉ̣ [ⲛⲉ ⲛⲁⲓⲱⲛ ⲉ]ϯ̣ⲛⲉ̣ <text:line-break/><text:span text:style-name="T1"> </text:span><text:span text:style-name="T2">(32/36) </text:span> ⲙ̅ⲙⲁⲩ ⲛ̅ⲧⲁⲣⲉⲡ̣[ⲗⲟⲅⲟⲥ] ⲉⲓ ⲁϩⲟⲩⲛ <text:line-break/><text:span text:style-name="T1"> </text:span><text:span text:style-name="T2">(32/37) </text:span> ⲁⲣⲁⲥ ⲕⲁ⟦ⲑ⟧ⲧⲁ ⲑⲉ̣ [ⲛ̅ⲧⲁϩⲓ]ϣ̅ⲣ̅ⲡ̅ ⲛ̅‐ <text:line-break/><text:span text:style-name="T1"> </text:span><text:span text:style-name="T2">(32/38) </text:span> ϫⲟⲟⲥ ⲁⲩⲱ ⲡ[ⲏ ⲉⲧϣⲱ]ⲡ̣ⲉ̣ ϣⲁ <text:line-break/><text:span text:style-name="T1"> </text:span><text:span text:style-name="T2">(32/39) </text:span> ⲡⲁⲧϣⲁⲡ̅ϥ̅ ⲁ[ϥⲉⲓⲛⲉ]ⲁ̣ⲃⲁⲗ ⲛ̅ <text:line-break/><text:span text:style-name="T1"> </text:span><text:span text:style-name="T2">(33/10) </text:span> (Lines 1--10 lacking) <text:line-break/><text:span text:style-name="T1"> </text:span><text:span text:style-name="T2">(33/11) </text:span> [ 14+- ⲙ̅]ⲡ̣ⲁⲧⲟⲩ <text:line-break/><text:span text:style-name="T1"> </text:span><text:span text:style-name="T2">(33/12) </text:span> [ 15+- ] ⲁⲃⲁⲗ ⲛ̅‐ <text:line-break/><text:span text:style-name="T1"> </text:span><text:span text:style-name="T2">(33/13) </text:span> [ 15+- ]ϩⲁⲡ̅ϥ̅ ⲁ <text:line-break/><text:span text:style-name="T1"> </text:span><text:span text:style-name="T2">(33/14) </text:span> [ 12+- ]ⲡ̣ⲥ̣ⲩⲍⲩⲅⲟⲥ ⲁⲩ̣‐ <text:line-break/><text:span text:style-name="T1"> </text:span><text:span text:style-name="T2">(33/15) </text:span> [ⲱ 10+- ]. ⲧϭⲓⲛⲏⲥⲓⲥ ⲙ̅ⲛ̅ <text:line-break/><text:span text:style-name="T1"> </text:span><text:span text:style-name="T2">(33/16) </text:span> [.].ⲉⲩⲧ̣[ 6+- ]ⲧⲉⲩⲟ ⲁⲃⲁⲗ ⲙ̅ⲡⲉ‐ <text:line-break/><text:span text:style-name="T1"> </text:span><text:span text:style-name="T2">(33/17) </text:span> [ⲭ]ⲣⲏ̣ⲥⲧⲟ̣[ⲥ....]ⲣⲧ̣ⲉ ⲁⲩⲱ ⲛⲉⲥ̣ⲡⲉⲣ‐ <text:line-break/><text:span text:style-name="T1"> </text:span><text:span text:style-name="T2">(33/18) </text:span> ⲙⲁ· ⲛ̅[ 13+- ]ⲃ ⲛ̅ⲡϣⲉ‐ <text:line-break/><text:soft-page-break/><text:span text:style-name="T1"> </text:span><text:span text:style-name="T2">(33/19) </text:span> ϫⲉ .ⲉ̣[.....ⲛⲉⲛⲧⲩⲡ]ⲱ̣ⲥⲓⲥ ⲙ̅ⲡϣ̅‐ <text:line-break/><text:span text:style-name="T1"> </text:span><text:span text:style-name="T2">(33/20) </text:span> ⲱϥ̅ⲧ̣̅̅ ⲁ̣[ 6+- ].[..ⲟ]ⲩⲙ̅ⲛ̅ⲧⲧⲉ‐ <text:line-break/><text:span text:style-name="T1"> </text:span><text:span text:style-name="T2">(33/21) </text:span> ⲗⲉⲓ[ⲟ]ⲥ̣ [ⲉⲡⲉⲓⲇⲏ ⲟ]ⲩⲙⲟⲣⲫⲏ ⲛ̅ⲧⲉ‐ <text:line-break/><text:span text:style-name="T1"> </text:span><text:span text:style-name="T2">(33/22) </text:span> ⲗⲉ[ⲓⲁ ⲧⲉⲧ̅ⲥ̅ϣ]ⲉ̣ [ⲁ]ⲃⲱⲕ ⲁⲧⲡⲉ ⲁϩⲟⲩⲛ̣ <text:line-break/><text:span text:style-name="T1"> </text:span><text:span text:style-name="T2">(33/23) </text:span> [ⲁⲡⲡⲗⲏⲣ]ⲱⲙ̣[ⲁ] ⲙ̅ⲡⲉϥⲟⲩⲱϣ[ⲉ] <text:line-break/><text:span text:style-name="T1"> </text:span><text:span text:style-name="T2">(33/24) </text:span> [ⲣⲱ ⲁⲣ̅ⲥⲩ]ⲛ̣ⲉⲩⲇ̣ⲟⲕⲉⲓ ⲙ̅ⲛ̅ ⲡϩⲓⲥⲉ <text:line-break/><text:span text:style-name="T1"> </text:span><text:span text:style-name="T2">(33/25) </text:span> [ⲁⲗⲗⲁ ⲁⲩ]ⲣ̣̅ⲕ̣ⲱⲗⲩⲉ ⲙ̅ⲙⲁ̣ϥ ⲁ̣ⲩⲉ̣ <text:line-break/><text:span text:style-name="T1"> </text:span><text:span text:style-name="T2">(33/26) </text:span> .[.....]..ⲉ ⲙ̅ⲙⲁϥ ϩⲓⲧ̅ⲛ̅ [ⲡ]ϩ̣ⲟ‐ <text:line-break/><text:span text:style-name="T1"> </text:span><text:span text:style-name="T2">(33/27) </text:span> ⲣⲟⲥ ⲉ̣ⲧ̣ⲉ ⲡⲉ̣ⲉⲓ ⲡⲉ ϩⲓⲧ̅ⲛ̅ ⲡ[ⲥ]ⲩⲍⲩ‐ <text:line-break/><text:span text:style-name="T1"> </text:span><text:span text:style-name="T2">(33/28) </text:span> ⲅⲟⲥ ⲉⲡⲉⲓ[ⲇ]ⲏ ⲧⲉⲥⲇⲓⲟⲣⲑⲱⲥⲓⲥ ⲛⲁ‐ <text:line-break/><text:span text:style-name="T1"> </text:span><text:span text:style-name="T2">(33/29) </text:span> ϣⲱⲡⲉ ⲉⲛ ϩⲓⲧ̅ⲛ̅ ⲗⲁⲩⲉ ⲉⲓⲙⲏⲧⲓ <text:line-break/><text:span text:style-name="T1"> </text:span><text:span text:style-name="T2">(33/30) </text:span> ϩⲓⲧ̅ⲛ̅ ⲡⲥ̣̅ϣ̣ⲏⲣⲉ ⲙ̅ⲙⲓⲛ ⲙ̅ⲙⲁ〈ⲥ〉 <text:line-break/><text:span text:style-name="T1"> </text:span><text:span text:style-name="T2">(33/31) </text:span> ⲡⲉⲉⲓ ⲉⲧⲉ ⲡ̣ⲱ̣ϥ ⲧⲏ̣ⲣ̣̅̅ϥ̅ ⲡⲉ ⲡⲡⲗⲏ‐ <text:line-break/><text:span text:style-name="T1"> </text:span><text:span text:style-name="T2">(33/32) </text:span> ⲣⲱⲙ̣ⲁ ⲛ̅ⲧⲙ̅ⲛ̅ⲧ̅ⲛⲟⲩⲧⲉ ⲁϥ̅ⲣ̅ϩⲛⲉϥ <text:line-break/><text:span text:style-name="T1"> </text:span><text:span text:style-name="T2">(33/33) </text:span> ⲛ̅ϩⲣⲏⲓ̈ ⲛ̅ϩⲏⲧ̅ϥ̅ ⲥⲱⲙⲁⲧⲓⲕⲱⲥ <text:line-break/><text:span text:style-name="T1"> </text:span><text:span text:style-name="T2">(33/34) </text:span> ⲁⲕⲱⲉ ⲛ̅ⲛ̅ϭⲁⲙ ⲁⲩⲱ ⲁϥⲉⲓ ⲁⲡⲓⲧ̅ⲛ̅ <text:line-break/><text:span text:style-name="T1"> </text:span><text:span text:style-name="T2">(33/35) </text:span> ⲛ〈ⲉ〉ⲉⲓ ⲛ̅ⲇⲉ ⲁϩⲁⲧⲥⲟⲫⲓⲁ ϣⲁⲡⲟⲩ <text:line-break/><text:span text:style-name="T1"> </text:span><text:span text:style-name="T2">(33/36) </text:span> ⲛ̅ⲧⲁⲣⲉϥ̣ⲡⲱⲧ ⲁⲧⲡⲉ ⲁⲃⲁⲗ ⲛ̅‐ <text:line-break/><text:span text:style-name="T1"> </text:span><text:span text:style-name="T2">(33/37) </text:span> ϩⲏⲧ̅ⲥ̅ ⲛ̣̅ϭ̣[ⲓ] ⲡ̣ⲉⲥ̣ϣⲏⲣⲉ ⲁⲥⲥⲟⲩ‐ <text:line-break/><text:span text:style-name="T1"> </text:span><text:span text:style-name="T2">(33/38) </text:span> ⲱⲱⲛ[ⲥ̅ ⲛ̅ⲅ]ⲁ̣ⲣ ⲉⲥϣⲟⲟⲡ ϩ̅ⲛ̅ ⲟⲩ <text:line-break/><text:span text:style-name="T1"> </text:span><text:span text:style-name="T2">(34/9) </text:span> (Lines 1--9 lacking) <text:line-break/><text:span text:style-name="T1"> </text:span><text:span text:style-name="T2">(34/10) </text:span> .ⲛⲉ̣.[ 12+- ϩ̅ⲛ̅ ⲟⲩϩⲱ]‐ <text:line-break/><text:span text:style-name="T1"> </text:span><text:span text:style-name="T2">(34/11) </text:span> ⲧ̣̅̅ⲣ̅ ⲁⲩⲱ̣ [ϩ̅ⲛ̅ ⲟⲩⲁⲡⲟⲕⲁⲧⲁⲥⲧⲁⲥⲓⲥ ⲁⲩ]‐ <text:line-break/><text:span text:style-name="T1"> </text:span><text:span text:style-name="T2">(34/12) </text:span> ⲗ̣ⲟ· ⲧⲟⲩ.[ <text:line-break/><text:span text:style-name="T1"> </text:span><text:span text:style-name="T2">(34/13) </text:span> [.]ⲉ ⲛ̅ⲛ̅ⲥⲛ̣[ⲏⲩ <text:line-break/><text:span text:style-name="T1"> </text:span><text:span text:style-name="T2">(34/14) </text:span> ⲛⲉⲉⲓ ⲙ̅ⲡⲉⲩ.[ <text:line-break/><text:span text:style-name="T1"> </text:span><text:span text:style-name="T2">(34/15) </text:span> ⲁϩⲓϣⲱⲡⲉ[ 9+- ]ⲕ̣.[ <text:line-break/><text:span text:style-name="T1"> </text:span><text:span text:style-name="T2">(34/16) </text:span> ⲉⲩϩⲱⲟⲩ ⲛⲉⲉ̣[ⲓ ⲛⲉ ⲡ...]ⲓ̣ⲥⲙⲟⲥ [ⲙ̅]‐ <text:line-break/><text:span text:style-name="T1"> </text:span><text:span text:style-name="T2">(34/17) </text:span> ⲙⲉ̣ⲛ̣ ⲁϥⲗⲟⲧⲉ[ 7+- ]ⲛ̣̅ⲇⲉ̣ ⲁϩ̣ⲟ̣[ⲩⲛ] <text:line-break/><text:span text:style-name="T1"> </text:span><text:span text:style-name="T2">(34/18) </text:span> ⲙ̅ⲛ̅ ⲛ̅ⲥⲱ[ 11+- ] ⲙ̅‐ <text:line-break/><text:span text:style-name="T1"> </text:span><text:span text:style-name="T2">(34/19) </text:span> ⲙⲁⲥ ⲛⲉⲉ̣[ⲓ ϭⲉ ⲛⲉⲧⲉ ⲛⲉⲩⲛ]ⲉ̣ⲩ ⲁ̣ⲣ̣ⲁⲓ̈ <text:line-break/><text:span text:style-name="T1"> </text:span><text:span text:style-name="T2">(34/20) </text:span> ⲡⲉ ⲛⲉⲉⲓ ⲉ̣ⲧ̣ⲛ̣̅[ 5+- ⲛ]ⲉ̣[ⲉ]ⲓ̣ ⲛ̅‐ <text:line-break/><text:span text:style-name="T1"> </text:span><text:span text:style-name="T2">(34/21) </text:span> ⲧⲁϩⲓⲙ̅ⲕ̅ⲙⲟⲩⲕ̣[ⲟⲩ 5+- ]ⲉⲓ ⲡ̣ⲓ̣‐ <text:line-break/><text:span text:style-name="T1"> </text:span><text:span text:style-name="T2">(34/22) </text:span> [ⲙ]ⲟ̣ⲩ ⲁⲩⲗⲟⲧⲉⲩ[ 7+- ]ⲁ̣ⲥ <text:line-break/><text:span text:style-name="T1"> </text:span><text:span text:style-name="T2">(34/23) </text:span> [ⲁⲩ]ⲱ ⲁⲥⲣ̅ⲙⲉⲧ[ⲁ]ⲛ̣ⲟ[ⲉⲓ ⲁⲩⲱ ⲁⲥ]‐ <text:line-break/><text:span text:style-name="T1"> </text:span><text:span text:style-name="T2">(34/24) </text:span> [ⲣ̅]ⲁ̣ⲓⲧⲉⲓ ⲙ̅ⲡⲓⲱⲧ ⲛ̅ⲧⲙ[ⲏⲉ ⲉⲥϫⲟⲩ] <text:line-break/><text:span text:style-name="T1"> </text:span><text:span text:style-name="T2">(34/25) </text:span> ⲙ̅ⲙ̣[ⲁ]ⲥ ⲉⲥⲧⲱ ⲁϩⲓⲕ̣[ⲱⲉ ⲛ̅ⲥⲱⲉⲓ] <text:line-break/><text:span text:style-name="T1"> </text:span><text:span text:style-name="T2">(34/26) </text:span> ⲙ̅ⲡ̣ⲁ̣ⲥⲩⲍⲩⲅⲟⲥ ⲉⲧ̣ⲃ̣ⲉ̣ [ⲡⲉⲉⲓ ϯ]ⲙ̣̅ <text:line-break/><text:span text:style-name="T1"> </text:span><text:span text:style-name="T2">(34/27) </text:span> ⲡⲃⲁⲗ ⲛ̅ⲡⲕⲉⲧⲁϫⲣ̣ⲟ ϯⲙ̅ⲡϣⲁ <text:line-break/><text:span text:style-name="T1"> </text:span><text:span text:style-name="T2">(34/28) </text:span> ⲛ̅ⲛⲉⲉⲓ ⲉϯϣⲱⲡ̣ ⲙ̅ⲙⲁⲩ ⲛⲉ‐ <text:line-break/><text:span text:style-name="T1"> </text:span><text:span text:style-name="T2">(34/29) </text:span> ⲉⲓϣⲟⲟⲡ· ⲡⲉ ϩ̅ⲙ̅ ⲡⲡⲗⲏⲣⲱⲙⲁ <text:line-break/><text:span text:style-name="T1"> </text:span><text:span text:style-name="T2">(34/30) </text:span> ⲉⲉⲓⲧⲉⲩⲟ ⲁⲃⲁⲗ ⲛ̅ⲛⲁⲓⲱⲛ ⲁⲩⲱ <text:line-break/><text:span text:style-name="T1"> </text:span><text:span text:style-name="T2">(34/31) </text:span> ⲉⲉⲓϯ ⲕⲁⲣⲡⲟⲥ ⲙ̅ⲛ̅ ⲡ̣ⲁⲥⲩⲍⲩⲅⲟⲥ <text:line-break/><text:span text:style-name="T1"> </text:span><text:span text:style-name="T2">(34/32) </text:span> ⲁⲥⲥⲟⲩⲱⲛ̅ⲥ̅ ⲛ̅ⲇⲉ ϫⲉ ⲛⲉⲟⲩⲉⲩ ⲧⲉ <text:line-break/><text:span text:style-name="T1"> </text:span><text:span text:style-name="T2">(34/33) </text:span> ⲁⲩⲱ ⲉⲩ ⲡⲉⲛⲧⲁϥϣⲱⲡⲉ ⲙ̅‐ <text:line-break/><text:span text:style-name="T1"> </text:span><text:span text:style-name="T2">(34/34) </text:span> ⲙⲁⲥ ⲁⲩϣ̅ⲡ̅ ϩⲓⲥⲉ ϭⲉ ⲙ̅ⲡⲉⲥⲛⲉⲩ <text:line-break/><text:span text:style-name="T1"> </text:span><text:span text:style-name="T2">(34/35) </text:span> ⲡⲁϫⲉⲩ ⲥ̅ⲥ̅ⲱⲃⲉ ⲉⲡⲉⲓ ⲁⲥϭⲱ ⲟⲩ‐ <text:line-break/><text:soft-page-break/><text:span text:style-name="T1"> </text:span><text:span text:style-name="T2">(34/36) </text:span> ⲁⲉⲉⲧ̅ⲥ̅ ⲁⲩⲱ ⲁⲥⲧⲁⲛⲧ̅ⲛ̅ ⲙ̅ⲡⲁⲧ <text:line-break/><text:span text:style-name="T1"> </text:span><text:span text:style-name="T2">(34/37) </text:span> ϣⲁⲡ̅ϥ̅ ⲡⲁϫⲉϥ̅ 5̅0ⲥ[ⲥ̅50ⲱⲃ]ⲉ̣ ⲛ̅ⲇⲉ ⲉⲡⲉⲓ <text:line-break/><text:span text:style-name="T1"> </text:span><text:span text:style-name="T2">(34/38) </text:span> ⲁⲥϣⲁⲁⲧ̅ⲥ̅ ⲁ̣ⲃⲁⲗ [ϩ̅ⲙ̅ ⲡ]ⲉ̣ⲥⲥⲩⲍⲩ‐ <text:line-break/><text:span text:style-name="T1"> </text:span><text:span text:style-name="T2">(35/1) </text:span> [ⲅⲟⲥ <text:line-break/><text:span text:style-name="T1"> </text:span><text:span text:style-name="T2">(35/8) </text:span> (Lines 1--8 lacking) <text:line-break/><text:span text:style-name="T1"> </text:span><text:span text:style-name="T2">(35/9) </text:span> [ 19+- ].[ <text:line-break/><text:span text:style-name="T1"> </text:span><text:span text:style-name="T2">(35/10) </text:span> ⲁ̣ⲃ[ⲁ]ⲗ .[.....ⲓ̅ⲏ̅ⲥ̅ ⲙ̅ⲛ̅]ⲧ̣ⲥⲟⲫⲓⲁ̣ <text:line-break/><text:span text:style-name="T1"> </text:span><text:span text:style-name="T2">(35/11) </text:span> ⲙ̅ⲙⲉⲛ ⲁⲩϭⲱⲗ̣[ⲡ ⲙ̅ⲡⲥ]ⲱⲛⲧ· ⲉⲡ̣[ⲉⲓ] <text:line-break/><text:span text:style-name="T1"> </text:span><text:span text:style-name="T2">(35/12) </text:span> ⲟⲩⲛ ⲛ̅ⲥⲡⲉⲣⲙⲁ̣ [ⲛ̅ⲧ]ⲥ̣ⲟ̣ⲫ̣ⲓⲁ ⲥⲉⲟⲉ[ⲓ] <text:line-break/><text:span text:style-name="T1"> </text:span><text:span text:style-name="T2">(35/13) </text:span> ⲛ̅ⲁⲧϫⲱⲕ ⲁⲃⲁ[ⲗ ⲁⲩ]ⲱ ⲛ̅ⲁⲙⲟⲣⲫ[ⲟⲥ] <text:line-break/><text:span text:style-name="T1"> </text:span><text:span text:style-name="T2">(35/14) </text:span> ⲁ5̅0̅ⲓ̅ⲏ̣̅̅[̅ⲥ̅50 ⲣ%7]ⲉⲡⲓⲛ[ⲟⲉⲓ ⲛ̅]ⲟⲩⲕⲧⲓⲥⲓⲥ ⲛ̅[ϯ]‐ <text:line-break/><text:span text:style-name="T1"> </text:span><text:span text:style-name="T2">(35/15) </text:span> ⲙⲓ[ⲛⲉ] ⲁ̣ϥⲥⲱ̣[ⲱⲛⲧ] ⲙ̅ⲙⲁϥ ⲛ̅ⲛ̅‐ <text:line-break/><text:span text:style-name="T1"> </text:span><text:span text:style-name="T2">(35/16) </text:span> ⲥ̣ⲡ̣ⲉⲣ̣ⲙⲁ ⲉⲣ̣[ⲉⲧⲥ]ⲟⲫⲓⲁ ⲣ̅ϩⲱϥ̅ ⲛ̅ⲙ̅‐ <text:line-break/><text:span text:style-name="T1"> </text:span><text:span text:style-name="T2">(35/17) </text:span> ⲙ̣ⲉϥ· ⲉⲡⲉⲓ ⲅⲁ̣[ⲣ ϩ̅]̅ⲛ̅ⲥⲡⲉⲣⲙⲁ ⲛⲉ <text:line-break/><text:span text:style-name="T1"> </text:span><text:span text:style-name="T2">(35/18) </text:span> ⲁⲩⲱ ⲙ̣̅̅ⲛ̣̅̅[ⲙⲟⲣⲫⲏ] ⲙ̣̅ⲙ̣ⲁⲩ ⲁϥⲉ̣ⲓ ⲁ‐ <text:line-break/><text:span text:style-name="T1"> </text:span><text:span text:style-name="T2">(35/19) </text:span> ϩⲣⲏ[ⲓ̈ ⲁⲩⲱ ⲁϥⲉⲓⲛⲉ] ⲁⲃⲁⲗ ⲙ̅ⲡⲓ‐ <text:line-break/><text:span text:style-name="T1"> </text:span><text:span text:style-name="T2">(35/20) </text:span> ⲡⲗⲏⲣ̣[ⲱⲙⲁ ⲛ̅ⲧⲉ ϩ]ⲛ̣̅[ⲁⲓ]ⲱⲛ ⲉⲩⲙ̅ⲡⲓ̣‐ <text:line-break/><text:span text:style-name="T1"> </text:span><text:span text:style-name="T2">(35/21) </text:span> ⲧ̣ⲟⲡ̣ⲟ̣[ⲥ ⲉⲛⲓⲁⲧ]ⲥ̣ⲱⲱⲛⲧ· ϩⲱⲟ̣[ⲩ ⲛ̅]‐ <text:line-break/><text:span text:style-name="T1"> </text:span><text:span text:style-name="T2">(35/22) </text:span> ⲛⲓⲁ̣[ⲓⲱⲛ ⲛⲉ ⲛ]ⲁ̣ⲡⲧⲩⲡⲟⲥ ⲙ̅ⲡ→ⲓ̣←[ⲡ]‐ <text:line-break/><text:span text:style-name="T1"> </text:span><text:span text:style-name="T2">(35/23) </text:span> [ⲗ]ⲏ̣[ⲣⲱⲙ]ⲁ̣ ⲙ̅ⲛ̣̅̅ ⲡⲓⲱⲧ ⲡⲓⲁⲧϣ̣[ⲁ]‐ <text:line-break/><text:span text:style-name="T1"> </text:span><text:span text:style-name="T2">(35/24) </text:span> [ⲡ̅ϥ̅ ϩⲁ]ⲡ̣ⲁⲧⲥⲱⲱⲛⲧ ⲙ̅ⲙⲉⲛ ⲁ̣[ϥ]‐ <text:line-break/><text:span text:style-name="T1"> </text:span><text:span text:style-name="T2">(35/25) </text:span> [ⲛ̅ ⲡⲧⲩ]ⲡ̣ⲟⲥ ⲙ̅ⲡⲁⲧⲥⲁⲁⲛⲧ̅ϥ̣̅̅ <text:line-break/><text:span text:style-name="T1"> </text:span><text:span text:style-name="T2">(35/26) </text:span> [ⲁⲃⲁⲗ ⲁ]ⲃ̣ⲁ̣ⲗ ⲛ̅ⲅⲁⲣ ϩ̅ⲙ̅ ⲡ̣ⲁ̣ⲧⲥⲁ̣ <text:line-break/><text:span text:style-name="T1"> </text:span><text:span text:style-name="T2">(35/27) </text:span> ⲁ̣ⲛ̣̅ⲧϥ̣̅ ⲉⲣⲉⲡ̣ⲓⲱⲧ ⲉⲓⲛⲉ ⲁⲃⲁⲗ ⲁ‐ <text:line-break/><text:span text:style-name="T1"> </text:span><text:span text:style-name="T2">(35/28) </text:span> ϩⲟⲩⲛ ⲁⲧⲙⲟⲣⲫⲏ ⲡⲥⲱⲱⲛ̅ⲧ̅ ⲛ̅‐ <text:line-break/><text:span text:style-name="T1"> </text:span><text:span text:style-name="T2">(35/29) </text:span> ⲇⲉ ⲑⲁⲉⲓⲃⲉⲥ ⲧⲉ ⲛ̅ⲛⲉⲧϣ̅ⲣ̅ⲡ̅ ⲛ̅‐ <text:line-break/><text:span text:style-name="T1"> </text:span><text:span text:style-name="T2">(35/30) </text:span> ϣⲟⲟⲡ ⲡⲉⲉⲓ ϭⲉ ⲓ̅ⲏ̅ⲥ ⲁϥⲥⲱ‐ <text:line-break/><text:span text:style-name="T1"> </text:span><text:span text:style-name="T2">(35/31) </text:span> ⲱⲛ̅ⲧ̅ ⲛ̅ⲧⲕⲧⲓⲥⲓⲥ ⲁⲩⲱ ⲁϥⲇⲏⲙⲓ‐ <text:line-break/><text:span text:style-name="T1"> </text:span><text:span text:style-name="T2">(35/32) </text:span> ⲟⲩⲣⲅⲉⲓ ⲁⲃⲁⲗ ϩ̅ⲛ̅ ⲛ̅ⲡⲁⲑⲟⲥ ⲉⲧ̅ⲙ̅ <text:line-break/><text:span text:style-name="T1"> </text:span><text:span text:style-name="T2">(35/33) </text:span> ⲡⲕⲱⲧⲉ ⲛ̅ⲛ̅ⲥⲡⲉⲣⲙⲁ ⲁⲩⲱ ⲁϥ‐ <text:line-break/><text:span text:style-name="T1"> </text:span><text:span text:style-name="T2">(35/34) </text:span> ⲡⲱⲣϫ ⲙ̅ⲙⲁⲩ ⲁⲃⲁⲗ ⲛ̅ⲛⲟⲩⲉⲣⲏⲩ <text:line-break/><text:span text:style-name="T1"> </text:span><text:span text:style-name="T2">(35/35) </text:span> ⲁⲩⲱ ⲛ̅ⲡⲁⲑⲟⲥ ⲉⲧⲥⲁⲧ̅ⲡ̅ ⲁϥ̅ⲛ̅ⲧⲟⲩ <text:line-break/><text:span text:style-name="T1"> </text:span><text:span text:style-name="T2">(35/36) </text:span> ⲁϩⲟⲩⲛ ⲁⲡⲡⲛⲉⲩⲙⲁ ⲛⲉⲑⲁⲩ <text:line-break/><text:span text:style-name="T1"> </text:span><text:span text:style-name="T2">(35/37) </text:span> ⲛ̅ⲇⲉ ⲁϩ[ⲟ]ⲩⲛ̣ ⲁⲛⲥⲁⲣⲕⲓⲕⲟⲛ· ϣⲁ‐ <text:line-break/><text:span text:style-name="T1"> </text:span><text:span text:style-name="T2">(35/38) </text:span> ⲁⲣⲡ ϭⲉ [ⲁⲃ]ⲁ̣ⲗ ϩ̅ⲛ̅ ⲛⲓⲡⲁⲑⲟⲥ ⲧⲏ‐ <text:line-break/><text:span text:style-name="T1"> </text:span><text:span text:style-name="T2">(36/1) </text:span> [ⲣⲟⲩ <text:line-break/><text:span text:style-name="T1"> </text:span><text:span text:style-name="T2">(36/7) </text:span> (Lines 1--7 lacking) <text:line-break/><text:span text:style-name="T1"> </text:span><text:span text:style-name="T2">(36/8) </text:span> ⲡ̣ⲉⲛ̣[ <text:line-break/><text:span text:style-name="T1"> </text:span><text:span text:style-name="T2">(36/9) </text:span> ⲟⲩⲧⲉ ⲛ̣[ 6+- ].[..].ⲉ̣.ϣ̣ <text:line-break/><text:span text:style-name="T1"> </text:span><text:span text:style-name="T2">(36/10) </text:span> ⲙ̅ⲙⲁϥ̣ [ⲉⲡⲉⲓ ⲟ]ⲩ̣ⲛ ⲧⲡⲣⲟⲛⲟⲓⲁ <text:line-break/><text:span text:style-name="T1"> </text:span><text:span text:style-name="T2">(36/11) </text:span> ⲁⲥϯ ⟦ⲁⲙⲓⲟ̣⟧ ⲛ̣̅[ⲧⲇ]ⲓ̣ⲟ̣ⲣⲑⲱⲥⲓⲥ ⲁⲧⲉⲩ‐ <text:line-break/><text:span text:style-name="T1"> </text:span><text:span text:style-name="T2">(36/12) </text:span> ⲟ̣ ⲁⲃⲁⲗ ⲛ̅5̅0̅ϩ̣̅̅[̅ⲛ̅50ϩ]ⲁ̣ⲉⲓⲃⲉⲥ̣ ⲙ̅ⲛ̅ ϩ̅ⲛ̅ <text:line-break/><text:span text:style-name="T1"> </text:span><text:span text:style-name="T2">(36/13) </text:span> ϩⲓⲕⲱⲛ ⲛ̅[ⲛⲉⲧ]ϣⲟⲟⲡ [ϫⲓⲛ] ⲛ̅‐ <text:line-break/><text:span text:style-name="T1"> </text:span><text:span text:style-name="T2">(36/14) </text:span> ϣⲁⲣⲡ ⲙ̅ⲛ̣̅̅ [ⲛⲉⲧ]ϣⲟⲟⲡ̣ [ⲁⲩ]ⲱ <text:line-break/><text:span text:style-name="T1"> </text:span><text:span text:style-name="T2">(36/15) </text:span> ⲛⲉⲧⲛⲁϣⲱ̣[ⲡⲉ ⲧ]ⲉⲉⲓ ϭ̣[ⲉ ⲧ]ⲉ̣ ⲧ̣ⲟⲓ‐ <text:line-break/><text:span text:style-name="T1"> </text:span><text:span text:style-name="T2">(36/16) </text:span> ⲕⲟⲛ[ⲟ]ⲙ̣ⲓⲁ ⲛ̅ⲡ̣[ⲓⲣ̅]ⲡ̣ⲓⲥⲧⲉⲩⲉ ⲙ̅ⲙ̣[ⲁ]ⲥ <text:line-break/><text:span text:style-name="T1"> </text:span><text:span text:style-name="T2">(36/17) </text:span> ⲛ̅ⲓ̅ⲏ̅ⲥ̅ ⲉⲧⲃⲉ [ⲡⲉⲛⲧ]ⲁ̣ϥ̣ⲥϩⲉⲉⲓ ⲙ̅‐ <text:line-break/><text:soft-page-break/><text:span text:style-name="T1"> </text:span><text:span text:style-name="T2">(36/18) </text:span> ⲡⲧⲏⲣ̅ϥ̅ ⲛ̅[ϩ̅ⲛ̅ⲧⲁⲛⲧ̅ⲛ̅ ⲙ]ⲛ̣̅ ϩ̅ⲛ̅ <text:line-break/><text:span text:style-name="T1"> </text:span><text:span text:style-name="T2">(36/19) </text:span> ϩⲓⲕⲱⲛ 5̅0̅ⲙ̣̅̅[̅ⲛ̅50 ϩ̅ⲛ̅ϩⲁⲉⲓⲃ]ⲉ̣ⲥ̣ ⲛ̅‐ <text:line-break/><text:span text:style-name="T1"> </text:span><text:span text:style-name="T2">(36/20) </text:span> ⲧⲁⲣⲉϥⲉⲓⲛ̣ⲉ̣ ⲁ̣[ⲃⲁⲗ ⲁⲛ] ⲛ̅ϭ̣ⲓ <text:line-break/><text:span text:style-name="T1"> </text:span><text:span text:style-name="T2">(36/21) </text:span> ⲓ̅ⲏ̅ⲥ̅ ⲁϥⲉⲓⲛⲉ ⲁ[ⲃⲁⲗ ⲙ̅]ⲙ̣[ⲁ]ⲩ̣ ⲙ̅‐ <text:line-break/><text:span text:style-name="T1"> </text:span><text:span text:style-name="T2">(36/22) </text:span> ⲡⲧⲏⲣ̅ϥ̅ ⲛⲁⲡⲉⲡ̣ⲗ̣ⲏ̣[ⲣⲱⲙⲁ] <text:line-break/><text:span text:style-name="T1"> </text:span><text:span text:style-name="T2">(36/23) </text:span> ⲙ̣̅̅ⲛ̅ ⲧⲥⲩⲍⲩⲅⲟⲥ ⲉⲧⲉ ⲛ̣[ⲉⲉⲓ ⲛⲉ] ⲛ̣̅‐ <text:line-break/><text:span text:style-name="T1"> </text:span><text:span text:style-name="T2">(36/24) </text:span> ⲁⲅⲅⲉⲗⲟⲥ ϩⲁⲙⲁ ⲅⲁⲣ ϩ[ⲛ̅ ⲧⲥⲩⲅ]‐ <text:line-break/><text:span text:style-name="T1"> </text:span><text:span text:style-name="T2">(36/25) </text:span> ⲭⲱ̣[ⲣ]ⲏⲥⲓⲥ ⲙ̅ⲡⲡⲗⲏ̣[ⲣⲱⲙⲁ] <text:line-break/><text:span text:style-name="T1"> </text:span><text:span text:style-name="T2">(36/26) </text:span> ϩⲁⲡ̣ⲉⲥⲥⲩⲍⲩⲅⲟⲥ ⲧ̣[ⲉ]ⲩⲟ̣ [ⲁⲃ]ⲁ̣[ⲗ] <text:line-break/><text:span text:style-name="T1"> </text:span><text:span text:style-name="T2">(36/27) </text:span> ⲛ̅ⲛ̅ⲁⲅⲅⲉⲗⲟⲥ ⲉϥϣⲟⲟⲡ ϩ̅ⲙ̅ <text:line-break/><text:span text:style-name="T1"> </text:span><text:span text:style-name="T2">(36/28) </text:span> ⲡⲟⲩⲱϣⲉ ⲙ̅ⲡⲓⲱⲧ· ⲡⲉⲉⲓ ⲛ̅‐ <text:line-break/><text:span text:style-name="T1"> </text:span><text:span text:style-name="T2">(36/29) </text:span> ⲅⲁⲣ ⲡⲉ ⲡⲟⲩⲱϣⲉ ⲙ̅ⲡⲓⲱⲧ ⲁ‐ <text:line-break/><text:span text:style-name="T1"> </text:span><text:span text:style-name="T2">(36/30) </text:span> ⲧ̅ⲙ̅ⲧⲣⲉⲗⲁⲩⲉ ϣⲱⲡⲉ ϩ̅ⲛ̅ ⲡ‐ <text:line-break/><text:span text:style-name="T1"> </text:span><text:span text:style-name="T2">(36/31) </text:span> ⲡⲗⲏⲣⲱⲙⲁ ⲟⲩϣ̅ⲛ̅ ⲥⲩⲍⲩⲅⲟⲥ <text:line-break/><text:span text:style-name="T1"> </text:span><text:span text:style-name="T2">(36/32) </text:span> ⲡⲟⲩⲱϣⲉ ϭⲉ ⲙ̅ⲡⲓⲱⲧ ⲡⲉ <text:line-break/><text:span text:style-name="T1"> </text:span><text:span text:style-name="T2">(36/33) </text:span> ⲧⲉⲩⲟ ⲁⲃⲁⲗ ⲛ̅ⲟⲩⲁⲉⲓ{ⲛ̅}ϣ ⲛⲓⲙ <text:line-break/><text:span text:style-name="T1"> </text:span><text:span text:style-name="T2">(36/34) </text:span> ⲁⲩⲱ ϯ ⲕⲁⲣⲡⲟⲥ· ⲁⲧⲣⲉⲥϣ̅ⲡ̅ <text:line-break/><text:span text:style-name="T1"> </text:span><text:span text:style-name="T2">(36/35) </text:span> ϩⲓⲥⲉ ϭⲉ ⲛⲉⲡⲟⲩⲱϣⲉ ⲉⲛ <text:line-break/><text:span text:style-name="T1"> </text:span><text:span text:style-name="T2">(36/36) </text:span> ⲙ̅ⲡⲓⲱⲧ ⲡⲉ· ⲉⲥϣⲟⲟⲡ ⲛ̅ⲅⲁⲣ <text:line-break/><text:span text:style-name="T1"> </text:span><text:span text:style-name="T2">(36/37) </text:span> ⲛ̅ϩⲣⲏⲓ̈ ⲛ̅ϩⲏⲧ̅ⲥ̅ ⲟ̣ⲩ̣ⲁ̣ⲉⲉⲧ〈ⲥ〉 ⲟⲩ‐ <text:line-break/><text:span text:style-name="T1"> </text:span><text:span text:style-name="T2">(36/38) </text:span> ϣ̅ⲛ̅ ⲡⲉⲥⲥⲩⲍⲩ[ⲅⲟⲥ]· ⲙⲁⲣ̅ⲛ̅ <text:line-break/><text:span text:style-name="T1"> </text:span><text:span text:style-name="T2">(37/7) </text:span> (Lines 1--7 lacking) <text:line-break/><text:span text:style-name="T1"> </text:span><text:span text:style-name="T2">(37/8) </text:span> .[ <text:line-break/><text:span text:style-name="T1"> </text:span><text:span text:style-name="T2">(37/9) </text:span> ⲛ̣̅ⲕ̣ⲉ̣ⲟ̣ⲩⲉ̣ⲉ̣[ⲓ <text:line-break/><text:span text:style-name="T1"> </text:span><text:span text:style-name="T2">(37/10) </text:span> ⲡⲙⲁϩⲥⲛⲉⲩ ⲁ̣[ <text:line-break/><text:span text:style-name="T1"> </text:span><text:span text:style-name="T2">(37/11) </text:span> ⲡϣⲏⲣⲉ ⲛ̅ⲕⲉⲟ̣ⲩ̣[ⲉⲉⲓ <text:line-break/><text:span text:style-name="T1"> </text:span><text:span text:style-name="T2">(37/12) </text:span> ⲧⲉ ⲧ̣[ⲧ]ⲉ̣ⲧ̣ⲣⲁⲥ ⲙ̅ⲡ̣ⲕⲟ[ⲥ]ⲙⲟⲥ [ⲁⲩⲱ] <text:line-break/><text:span text:style-name="T1"> </text:span><text:span text:style-name="T2">(37/13) </text:span> ϯ[ⲧ]ⲉ̣[ⲧ]ⲣⲁⲥ ⲁⲥⲧⲉⲩⲟ ⲁⲃⲁⲗ ⲛ̅ⲕ[ⲁⲣ]‐ <text:line-break/><text:span text:style-name="T1"> </text:span><text:span text:style-name="T2">(37/14) </text:span> ⲡ̣[ⲟ]ⲥ ϩⲱⲥ ⲟⲩϩⲉⲃⲇⲟⲙⲁⲥ ⲡ̣[ⲉ] <text:line-break/><text:span text:style-name="T1"> </text:span><text:span text:style-name="T2">(37/15) </text:span> ⲡⲡ̣ⲗ̣ⲏⲣⲱⲙ[ⲁ ⲙ̅]ⲡ̣ⲕⲟ̣[ⲥ]ⲙ̣[ⲟⲥ ⲁϥ]‐ <text:line-break/><text:span text:style-name="T1"> </text:span><text:span text:style-name="T2">(37/16) </text:span> ⲉ̣ⲓ̣ ⲛ̅ⲇⲉ ⲁϩ[ⲟⲩⲛ ⲁϩ̅]̅ⲛ̅ϩ[ⲓⲕⲱⲛ] <text:line-break/><text:span text:style-name="T1"> </text:span><text:span text:style-name="T2">(37/17) </text:span> ⲙ̅ⲛ̅ ϩ̅ⲛ̅ⲉ̣[ⲓⲛⲉ ⲙ̅ⲛ̅ ϩ̅]ⲛ̅ⲁⲅ̣[ⲅⲉⲗⲟⲥ] <text:line-break/><text:span text:style-name="T1"> </text:span><text:span text:style-name="T2">(37/18) </text:span> ⲙ̅ⲛ̅ ϩ̅ⲛ̣̅ⲁⲣ̣[ⲭⲁⲅⲅⲉⲗ]ⲟ̣ⲥ ϩ̅[ⲛ̅ⲛⲟⲩ]‐ <text:line-break/><text:span text:style-name="T1"> </text:span><text:span text:style-name="T2">(37/19) </text:span> ⲧⲉ ⲁⲩⲱ ϩ̅ⲛ̅[ⲗⲉⲓ]ⲧ̣ⲟⲩ[ⲣⲅⲟⲥ] <text:line-break/><text:span text:style-name="T1"> </text:span><text:span text:style-name="T2">(37/20) </text:span> ⲛ̅[ⲉ]ⲉ̣[ⲓ ⲧ]ⲏⲣⲟⲩ ⲛ̣̅ⲧⲁⲣⲟⲩ̣[ϣⲱ]‐ <text:line-break/><text:span text:style-name="T1"> </text:span><text:span text:style-name="T2">(37/21) </text:span> ⲡ[ⲉ ϩⲓ]ⲧ̣̅̅ⲛ̅ ⲧⲡⲣⲟⲛⲟⲓⲁ.[ <text:line-break/><text:span text:style-name="T1"> </text:span><text:span text:style-name="T2">(37/22) </text:span> ⲙ̣[....]ⲉⲣ ⲛ̅ⲓ̅ⲏ̅ⲥ· ⲉϥ̣[ <text:line-break/><text:span text:style-name="T1"> </text:span><text:span text:style-name="T2">(37/23) </text:span> [...]. ⲛ̅ⲛ̅ⲥⲡⲉⲣⲙⲁ.[ <text:line-break/><text:span text:style-name="T1"> </text:span><text:span text:style-name="T2">(37/24) </text:span> [...]ⲙ̅ⲡⲙⲟⲛⲟⲅⲉⲛⲏⲥ̣[ <text:line-break/><text:span text:style-name="T1"> </text:span><text:span text:style-name="T2">(37/25) </text:span> [..]ⲛ̣̅ⲧ̣ⲁⲩ ⲙ̣̅ⲙⲉⲛ ϩ̅ⲙ̅[ⲡⲛⲉⲩ]‐ <text:line-break/><text:span text:style-name="T1"> </text:span><text:span text:style-name="T2">(37/26) </text:span> [ⲙⲁ]ⲧ̣ⲓ̣ⲕ̣ⲟⲛ̣ ⲛⲉ ⲁⲩⲱ ⲛ̅ⲥ[ⲁⲣ]ⲕ̣ⲓ̣‐ <text:line-break/><text:span text:style-name="T1"> </text:span><text:span text:style-name="T2">(37/27) </text:span> ⲕⲟⲛ̣ ⲛ̣̅ⲛⲉ̣ⲑ̣̅̅ⲛ̅ⲧⲡⲉ ⲙ̅ⲛ̣̅ ⲛ̣ⲉⲧ‐ <text:line-break/><text:span text:style-name="T1"> </text:span><text:span text:style-name="T2">(37/28) </text:span> ϩⲓϫ̅ⲙ̅ ⲡⲕⲁϩ ⲁϥⲧⲁⲙⲓⲟ ⲛ̣ⲉⲩ <text:line-break/><text:span text:style-name="T1"> </text:span><text:span text:style-name="T2">(37/29) </text:span> ⲛ̅ⲟⲩⲧⲟⲡⲟⲥ· ⲛ̅ϯⲙⲓⲛⲉ [ⲁ]ⲩⲱ <text:line-break/><text:span text:style-name="T1"> </text:span><text:span text:style-name="T2">(37/30) </text:span> ⲟⲩⲥⲭⲟⲗⲏ ⲛ̅ϯⲙⲓⲛⲉ ⲁϩ[ⲟ]ⲩⲛ ⲁⲩ‐ <text:line-break/><text:span text:style-name="T1"> </text:span><text:span text:style-name="T2">(37/31) </text:span> ⲥⲃⲱ ⲁⲩⲱ ⲁ〈ϩ〉ⲟⲩⲛ ⲁⲩⲙⲟⲣⲫⲏ <text:line-break/><text:span text:style-name="T1"> </text:span><text:span text:style-name="T2">(37/32) </text:span> ⲁϥ̅ⲣ̅ⲁⲣⲭⲉⲥⲑⲁⲓ ϭⲉ ⲛ̅ϭⲓ ⲡⲉⲉⲓ <text:line-break/><text:soft-page-break/><text:span text:style-name="T1"> </text:span><text:span text:style-name="T2">(37/33) </text:span> ⲇⲏⲙⲓⲟⲩⲣⲅⲟⲥ ⲁⲧⲁⲙⲓⲟ ⲛ̅ⲟⲩ‐ <text:line-break/><text:span text:style-name="T1"> </text:span><text:span text:style-name="T2">(37/34) </text:span> ⲣⲱⲙⲉ ⲕⲁⲧⲁ ⲧ̅ϥ̅ϩⲓⲕⲱⲛ ⲙⲉⲛ <text:line-break/><text:span text:style-name="T1"> </text:span><text:span text:style-name="T2">(37/35) </text:span> ⲕⲁⲧⲁ ⲡⲓⲛⲉ ⲛ̅ⲇⲉ ⲛ̅ⲛⲉⲧϣⲟ‐ <text:line-break/><text:span text:style-name="T1"> </text:span><text:span text:style-name="T2">(37/36) </text:span> ⲟⲡ ϫⲓⲛ ⲛ̅ϣⲁⲣ̅ⲡ̅ ⲟⲩⲙⲁ ⲛϣⲱ‐ <text:line-break/><text:span text:style-name="T1"> </text:span><text:span text:style-name="T2">(37/37) </text:span> ⲡⲉ ⲛ̅ϯⲙⲓⲛⲉ ⲡⲉⲛⲧⲁⲥ̅ⲣ̅ⲭⲣⲱ <text:line-break/><text:span text:style-name="T1"> </text:span><text:span text:style-name="T2">(37/38) </text:span> ⲙ̅ⲙⲁϥ̅ ⲛ̅ⲛ̅ⲥⲡⲉⲣⲙⲁ ⲛ̅ϭⲓ <text:line-break/><text:span text:style-name="T1"> </text:span><text:span text:style-name="T2">(38/9) </text:span> (Lines 1--9 lacking) <text:line-break/><text:span text:style-name="T1"> </text:span><text:span text:style-name="T2">(38/10) </text:span> [ 11+- ]..[.ⲡⲱ]ⲣ̣ϫ̣̅ <text:line-break/><text:span text:style-name="T1"> </text:span><text:span text:style-name="T2">(38/11) </text:span> [ 10+- ⲡ]ⲛ̣ⲟ̣ⲩⲧⲉ ⲛ̅ⲧⲁⲣⲟⲩ <text:line-break/><text:span text:style-name="T1"> </text:span><text:span text:style-name="T2">(38/12) </text:span> [ 9+- ]ⲉ̣ⲓ̣ ⲉⲧⲃⲉ ⲡⲣⲱⲙⲉ <text:line-break/><text:span text:style-name="T1"> </text:span><text:span text:style-name="T2">(38/13) </text:span> [ⲉⲡⲇ]ⲓ̣ⲁ̣ⲃ̣[ⲟⲗ]ⲟ̣ⲥ ⲙ̅ⲙⲉⲛ ⲟⲩⲉⲉⲓ ⲡⲉ <text:line-break/><text:span text:style-name="T1"> </text:span><text:span text:style-name="T2">(38/14) </text:span> [ⲛ̅ⲧ]ⲉ̣ ⲛⲁⲡⲛⲟⲩⲧⲉ ⲁϥⲥⲉϩⲱϥ̅ ⲁ‐ <text:line-break/><text:span text:style-name="T1"> </text:span><text:span text:style-name="T2">(38/15) </text:span> [ⲃ]ⲁⲗ ⲁⲩⲱ ⲁϥⲧⲱⲣⲡ ⲛ̅ⲧ̣ⲡ̣[ⲗ]ⲁⲧⲉⲓ‐ <text:line-break/><text:span text:style-name="T1"> </text:span><text:span text:style-name="T2">(38/16) </text:span> [ⲁ ⲧ]ⲏ̣ⲣ̅ⲥ̣̅̅ ⲛ̅ⲛ̅ⲡ̣[ⲟ]ⲩ̣ⲗⲱⲛ ⲁ̣[ⲩⲱ] ⲁϥ‐ <text:line-break/><text:span text:style-name="T1"> </text:span><text:span text:style-name="T2">(38/17) </text:span> [ⲣ̅ⲁⲡⲱ]ⲑ̣ⲉⲓ ⲛ̣[ⲉϥ ⲛ̅ⲧ]ⲉ̣ϥⲛⲟⲩⲛ̣ⲉ̣ ⲙ̣̅‐ <text:line-break/><text:span text:style-name="T1"> </text:span><text:span text:style-name="T2">(38/18) </text:span> [ⲙⲓⲛ ⲙ̅ⲙ[ⲁϥ ⲁⲃⲁ]ⲗ̣ ϩ̅ⲙ̅ ⲡⲙⲁ ⲉ̣‐ <text:line-break/><text:span text:style-name="T1"> </text:span><text:span text:style-name="T2">(38/19) </text:span> [ⲧ̅ⲙ̅ⲙ]ⲉ̣ⲩ 5̅0ϩ[ⲙ̅50 ⲡⲥⲱⲙ]ⲁ̣ ⲙ̅ⲛ̅ ϩ̅ⲛ̅‐ <text:line-break/><text:span text:style-name="T1"> </text:span><text:span text:style-name="T2">(38/20) </text:span> [ϣⲉⲗ ⲛ̅]ⲥⲁ̣ⲣ̣[ⲝ ϥϭ]ⲁ̣ⲗⲉ ⲛ̅ⲅⲁⲣ ⲙ̅‐ <text:line-break/><text:span text:style-name="T1"> </text:span><text:span text:style-name="T2">(38/21) </text:span> [ⲡⲣⲱ]ⲙ̣ⲉ ⲛ̅ⲡⲛⲟⲩⲧⲉ ⲁ[ⲩ]ⲱ ⲁ̣ⲡⲁ‐ <text:line-break/><text:span text:style-name="T1"> </text:span><text:span text:style-name="T2">(38/22) </text:span> [ⲇⲁⲙ ϫ]ⲁϥ̅ ⲉⲧⲃⲉ ⲡⲉⲉⲓ ⲁ̣[ϥ]ϫ̣[ⲡ]ⲟ‐ <text:line-break/><text:span text:style-name="T1"> </text:span><text:span text:style-name="T2">(38/23) </text:span> [ⲛⲉϥ ⲛ̅]ϩ̣̅̅ⲛ̅ϣⲏⲣⲉ ⲉⲩ[ϯ ϭⲱⲛ]ⲧ ⲛ̅‐ <text:line-break/><text:span text:style-name="T1"> </text:span><text:span text:style-name="T2">(38/24) </text:span> [ⲛⲉⲩⲉⲣ]ⲏⲩ ϩⲁⲕⲁⲓ̈ⲛ ⲛ̅ⲇ̣[ⲉ ⲁϥ]ⲙ̣[ⲟⲩ]‐ <text:line-break/><text:span text:style-name="T1"> </text:span><text:span text:style-name="T2">(38/25) </text:span> [ⲟⲩⲧ] ⲁⲃⲉⲗ ⲡⲉϥⲥⲁⲛ ⲁ̣[ⲡⲇⲏⲙⲓ]‐ <text:line-break/><text:span text:style-name="T1"> </text:span><text:span text:style-name="T2">(38/26) </text:span> [ⲟⲩⲣⲅⲟ]ⲥ ⲅⲁⲣ ⲛⲓϥⲉ ⲁϩⲟⲩ̣[ⲛ ⲁⲣⲁⲩ] <text:line-break/><text:span text:style-name="T1"> </text:span><text:span text:style-name="T2">(38/27) </text:span> ⲙ̅ⲡ[ⲉ]ϥ̣ⲡⲛⲉⲩⲙⲁ ⲁ̣ϥ̣ϣ[ⲱⲡⲉ] <text:line-break/><text:span text:style-name="T1"> </text:span><text:span text:style-name="T2">(38/28) </text:span> ⲛ̅ϭ̣[ⲓ] ⲡ̣ⲙⲓϣⲉ ⲙ̅ⲛ̅ ⲧⲁⲡⲟ̣ⲥ̣ⲧⲁ̣ⲥ̣ⲓ̣‐ <text:line-break/><text:span text:style-name="T1"> </text:span><text:span text:style-name="T2">(38/29) </text:span> ⲁ ⲛ̅ⲛ̅ⲁⲅⲅⲉⲗⲟⲥ ⲁⲩⲱ ⲧⲙ̅ⲛ̅ⲧⲣⲱ‐ <text:line-break/><text:span text:style-name="T1"> </text:span><text:span text:style-name="T2">(38/30) </text:span> ⲙⲉ ⲛ̣ⲁ̣ⲩⲛⲉⲙ ⲙ̅ⲛ̅ ⲛⲁϭⲃⲟⲩⲣ ⲙ̣[ⲛ̅] <text:line-break/><text:span text:style-name="T1"> </text:span><text:span text:style-name="T2">(38/31) </text:span> ⲛⲉⲑ̅ⲛ̣̅̅ ⲧⲡⲉ ⲙ̅ⲛ̅ ⲛⲉⲧϩⲓϫ̅ⲙ̅ ⲡⲕⲁϩ <text:line-break/><text:span text:style-name="T1"> </text:span><text:span text:style-name="T2">(38/32) </text:span> ⲛ̅ⲡⲛⲉⲩⲙⲁ ⲙ̅ⲛ̅ ⲛ̅ⲥⲁⲣⲕⲓⲕⲟⲛ <text:line-break/><text:span text:style-name="T1"> </text:span><text:span text:style-name="T2">(38/33) </text:span> ⲁⲩⲱ ⲡⲇⲓⲁⲃⲟⲗⲟⲥ ⲛⲁϩⲣ̅ⲛ̅ ⲡⲛⲟⲩ‐ <text:line-break/><text:span text:style-name="T1"> </text:span><text:span text:style-name="T2">(38/34) </text:span> ⲧⲉ ⲉⲧⲃⲉ ⲡⲉⲉⲓ ϩⲁⲛⲁⲅⲅⲉⲗⲟⲥ ⲣ̅ⲉ‐ <text:line-break/><text:span text:style-name="T1"> </text:span><text:span text:style-name="T2">(38/35) </text:span> ⲡⲓⲑⲩⲙⲉⲓ ⲁⲛϣⲉⲉⲣⲉ ⲛ̅ⲛ̅ⲣⲱⲙⲉ <text:line-break/><text:span text:style-name="T1"> </text:span><text:span text:style-name="T2">(38/36) </text:span> ⲁⲩⲱ ⲁⲩⲉⲓ ⲁⲡⲓⲧ̅ⲛ̅ ⲁⲥⲁⲣⲝ ϩⲱⲥ‐ <text:line-break/><text:span text:style-name="T1"> </text:span><text:span text:style-name="T2">(38/37) </text:span> ⲧⲉ ⲛ̅ⲧⲉⲡⲛⲟⲩⲧⲉ ⲉⲓⲣⲉ ⲛ̅ⲟⲩⲕⲁⲧⲁ‐ <text:line-break/><text:span text:style-name="T1"> </text:span><text:span text:style-name="T2">(38/38) </text:span> ⲕⲗⲩⲥⲙⲟⲥ ⲁⲩⲱ ⲥⲭⲉⲇⲟⲛ ⲁϥ̅ⲣ̅ <text:line-break/><text:span text:style-name="T1"> </text:span><text:span text:style-name="T2">(38/39) </text:span> ϩⲧⲏϥ ϫⲉ ⲁϥⲥⲱⲱⲛⲧ ⲙ̅ⲡⲕⲟⲥ‐ <text:line-break/><text:span text:style-name="T1"> </text:span><text:span text:style-name="T2">(39/1) </text:span> [ⲙⲟⲥ <text:line-break/><text:span text:style-name="T1"> </text:span><text:span text:style-name="T2">(39/2) </text:span> (Lines 1--7 lacking) <text:line-break/><text:span text:style-name="T1"> </text:span><text:span text:style-name="T2">(39/7) </text:span> [....].[ <text:line-break/><text:span text:style-name="T1"> </text:span><text:span text:style-name="T2">(39/8) </text:span> [....]ⲧ̣ⲁⲛ̣[ <text:line-break/><text:span text:style-name="T1"> </text:span><text:span text:style-name="T2">(39/9) </text:span> [..]ⲟ̣ⲥ ⲙ̅ⲙⲉⲛ̣[ 11+- ⲡⲥⲩ]‐ <text:line-break/><text:span text:style-name="T1"> </text:span><text:span text:style-name="T2">(39/10) </text:span> [ⲍ]ⲩ̣ⲅⲟⲥ ⲙ̅ⲛ̅ ⲧⲥⲟ̣[ⲫⲓⲁ ⲙ̅ⲛ̅ ⲡⲥ̅ϣⲏ]‐ <text:line-break/><text:span text:style-name="T1"> </text:span><text:span text:style-name="T2">(39/11) </text:span> ⲣ̣ⲉ ⲙ̅ⲛ̅ ⲛ̅ⲁⲅⲅⲉⲗⲟ̣ⲥ̣ ⲙ̣[ⲛ̅ ⲛ̅ⲥⲡⲉⲣ]‐ <text:line-break/><text:span text:style-name="T1"> </text:span><text:span text:style-name="T2">(39/12) </text:span> ⲙⲁ· ⲡⲥⲩⲍⲩⲅⲟⲥ ⲛ̅ⲇⲉ ⲡ̣ⲧ̣ⲉ̣[ⲗⲉⲓⲟⲥ] <text:line-break/><text:span text:style-name="T1"> </text:span><text:span text:style-name="T2">(39/13) </text:span> ⲁⲩⲱ̣ ⲧⲥⲟⲫⲓⲁ ⲙ̅ⲛ̅ ⲓ̅ⲏ̅ⲥ ⲁⲩⲱ̣ [ⲛ̅ⲁⲅⲅⲉ]‐ <text:line-break/><text:span text:style-name="T1"> </text:span><text:span text:style-name="T2">(39/14) </text:span> ⲗⲟ[ⲥ] ⲙ̣̅̅ⲛ̅ ⲛ̅ⲥⲡⲉⲣⲙⲁ ϩ̅ⲛ̅ϩⲓ̣[ⲕⲱⲛ] <text:line-break/><text:soft-page-break/><text:span text:style-name="T1"> </text:span><text:span text:style-name="T2">(39/15) </text:span> ⲛⲉ [ⲙ̅]ⲡⲡⲗⲏⲣ[ⲱ]ⲙ̣ⲁ ⲡⲇ̣ⲏ̣[ⲙⲓ]‐ <text:line-break/><text:span text:style-name="T1"> </text:span><text:span text:style-name="T2">(39/16) </text:span> ⲟ̣ⲩ̣ⲣⲅ̣ⲟⲥ ϭⲉ [ⲁϥ̅ⲣ̅ϩⲁⲉ]ⲓ̣ⲃⲉ̣ⲥ [ⲁ]‐ <text:line-break/><text:span text:style-name="T1"> </text:span><text:span text:style-name="T2">(39/17) </text:span> ⲡⲥ[ⲩ]ⲍⲩⲅⲟⲥ ⲙⲛ̣̅ [ⲡ]ⲡ̣ⲗⲏⲣⲱⲙ̣[ⲁ] <text:line-break/><text:span text:style-name="T1"> </text:span><text:span text:style-name="T2">(39/18) </text:span> ⲁⲩ[ⲱ] ⲓ̣̅̅ⲏ̅ⲥ̅ ⲙ̅ⲛ̅ [ⲧⲥⲟⲫ]ⲓ̣ⲁ ⲙ̅ⲛ̣̅ ⲛ̅[ⲁⲅ]‐ <text:line-break/><text:span text:style-name="T1"> </text:span><text:span text:style-name="T2">(39/19) </text:span> ⲅⲉ̣[ⲗⲟ]ⲥ̣ ⲙ̅ⲛ̅ ⲛ̅ⲥⲡ̣[ⲉⲣ]ⲙ̣ⲁ· ⲡ̣[ⲧ]ⲉ̣ⲗ̣[ⲉⲓⲟⲥ] <text:line-break/><text:span text:style-name="T1"> </text:span><text:span text:style-name="T2">(39/20) </text:span> [ϯ ⲉⲁⲩ] ⲛ̅ⲧⲥⲟⲫⲓⲁ ⲧϩⲓⲕ̣[ⲱⲛ] <text:line-break/><text:span text:style-name="T1"> </text:span><text:span text:style-name="T2">(39/21) </text:span> [ϯ ⲉⲁⲩ] ⲛ̅ⲧⲙⲏⲉ ⲡⲉⲁⲩ ⲛ̣[ⲇⲉ ⲛ̅]‐ <text:line-break/><text:span text:style-name="T1"> </text:span><text:span text:style-name="T2">(39/22) </text:span> [ⲛ̅ⲥⲡⲉ]ⲣ̣ⲙ̣ⲁ̣ ⲙ̅ⲛ̅ ⲓ̅ⲏⲥ̅ ⲛ̣ⲁ̣ⲧ̣ⲥ̣[ⲓⲅⲏ] <text:line-break/><text:span text:style-name="T1"> </text:span><text:span text:style-name="T2">(39/23) </text:span> [ⲛⲉ ⲙ̅ⲛ̅] ⲡ̣ⲙ̣ⲟⲛⲟⲅⲉⲛⲏ[ⲥ ⲁⲩⲱ] <text:line-break/><text:span text:style-name="T1"> </text:span><text:span text:style-name="T2">(39/24) </text:span> [ⲛ̅ⲁⲅⲅⲉ]ⲗ̣ⲟⲥ ⲛ̅ⲛ̅ϩⲁⲩⲧ ⲙ̅ⲛ̣̅̅ [ⲛ̅]‐ <text:line-break/><text:span text:style-name="T1"> </text:span><text:span text:style-name="T2">(39/25) </text:span> [ⲥⲡⲉⲣⲙⲁ]ⲧ̣ⲓⲕⲟⲛ ⲛ̅ⲛ̅ⲥϩⲓ̣[ⲙⲉ] <text:line-break/><text:span text:style-name="T1"> </text:span><text:span text:style-name="T2">(39/26) </text:span> [ϩ̅ⲛ̅ⲡ]ⲗ̣ⲏ̣ⲣ̣[ⲱ]ⲙⲁ ⲧⲏⲣⲟⲩ [ⲛⲉ ϩⲟ]‐ <text:line-break/><text:span text:style-name="T1"> </text:span><text:span text:style-name="T2">(39/27) </text:span> ⲧ̣ⲁ̣ⲛ̣ ϭ̣ⲉ ⲉⲣⲉϣⲁⲛⲧⲥⲟⲫⲓ̣[ⲁ] ϫ̣ⲓ <text:line-break/><text:span text:style-name="T1"> </text:span><text:span text:style-name="T2">(39/28) </text:span> ⲙ̅ⲡ̅ⲥ̅ⲥⲩⲍⲩⲅⲟⲥ ⲁⲩⲱ ⲓ̅ⲏⲥ̅ ⲛ̣̅ϥ̅ <text:line-break/><text:span text:style-name="T1"> </text:span><text:span text:style-name="T2">(39/29) </text:span> ϫⲓ ⲙ̅ⲡⲉⲭⲣⲏⲥⲧⲟⲥ ⲙ̅ⲛ̅ ⲛ̣̅[ⲥ]ⲡⲉⲣ‐ <text:line-break/><text:span text:style-name="T1"> </text:span><text:span text:style-name="T2">(39/30) </text:span> ⲙⲁ ⲙ̅ⲛ̅ ⲛ̅ⲁⲅⲅⲉⲗⲟⲥ ⲧⲟⲧ̣[ⲉ ⲡ]ⲓ̣‐ <text:line-break/><text:span text:style-name="T1"> </text:span><text:span text:style-name="T2">(39/31) </text:span> ⲡⲗⲏⲣⲱⲙⲁ ϥ̅ⲛⲁϫⲓ ⲛ̅ⲧⲥⲟ̣ⲫⲓⲁ <text:line-break/><text:span text:style-name="T1"> </text:span><text:span text:style-name="T2">(39/32) </text:span> ϩ̅ⲛ̅ ⲟⲩⲣⲉϣⲉ ⲁⲩⲱ ⲡⲧⲏⲣ̅[ϥ̅] ⲛⲁ‐ <text:line-break/><text:span text:style-name="T1"> </text:span><text:span text:style-name="T2">(39/33) </text:span> ϣⲱⲡⲉ ϩ̅ⲛ̅ ⲟⲩϩⲱⲧ̅ⲣ̅ ⲁⲩ̣[ⲱ] ϩ̣̅ⲛ̅ <text:line-break/><text:span text:style-name="T1"> </text:span><text:span text:style-name="T2">(39/34) </text:span> ⲟⲩⲁⲡⲟⲕⲁⲧⲁⲥⲧⲁⲥⲓⲥ ϩ̅ⲙ̅ ⲡⲉⲉⲓ <text:line-break/><text:span text:style-name="T1"> </text:span><text:span text:style-name="T2">(39/35) </text:span> ⲛ̅ⲅⲁⲣ ϩⲁⲛⲁⲓⲱⲛ ⲁⲩϫⲓ ⲙ̅ⲡ‐ <text:line-break/><text:span text:style-name="T1"> </text:span><text:span text:style-name="T2">(39/36) </text:span> ϩⲟⲩⲟ ⲁⲩⲥⲟⲩⲱⲛⲟⲩ ⲛ̅ⲅⲁⲣ ϫⲉ <text:line-break/><text:span text:style-name="T1"> </text:span><text:span text:style-name="T2">(39/37) </text:span> 2ʹ99 2ⲉⲩϣⲁⲛϣ̅ϥ̅ⲉⲓⲉ ⲥⲉϣⲟⲟⲡ <text:line-break/><text:span text:style-name="T1"> </text:span><text:span text:style-name="T2">(39/38) </text:span> 2ʹ99 2ⲛ̅ⲁⲧϣ̅ϥ̅ⲉⲓⲉʹ99 <text:line-break/><text:span text:style-name="T1"> </text:span><text:span text:style-name="T2">(39/39) </text:span> ʹ99 </text:p>
      <text:p text:style-name="P1"/>
      <text:p text:style-name="P3">( codex XI ) 2a. On the Anointing</text:p>
      <text:p text:style-name="P2"><text:span text:style-name="T1"> </text:span><text:span text:style-name="T2">(40/7) </text:span> (Lines 1-7 lacking) <text:line-break/><text:span text:style-name="T1"> </text:span><text:span text:style-name="T2">(40/8) </text:span> [ 11+- ]ⲣ̣ⲉ̣.[ <text:line-break/><text:span text:style-name="T1"> </text:span><text:span text:style-name="T2">(40/9) </text:span> [ 10+- ]ϩ̣ ⲕⲁⲧ̣[ⲁ <text:line-break/><text:span text:style-name="T1"> </text:span><text:span text:style-name="T2">(40/10) </text:span> [ 10+- ]ⲡ̣ⲧⲩⲡⲟⲥ ⲙ̣̅[ <text:line-break/><text:span text:style-name="T1"> </text:span><text:span text:style-name="T2">(40/11) </text:span> [ 7+- ]ⲛⲉⲩ ⲁⲣⲁϥ ⲥϣⲉ̣ [ⲁ]‐ <text:line-break/><text:span text:style-name="T1"> </text:span><text:span text:style-name="T2">(40/12) </text:span> [ⲣⲁⲕ] ϯ̣ⲛ[ⲟ]ⲩ̣ ⲁⲧ̅ⲛ̅ⲛⲁⲩ ⲙ̅ⲡⲉⲕϣⲏ̣‐ <text:line-break/><text:span text:style-name="T1"> </text:span><text:span text:style-name="T2">(40/13) </text:span> [ⲣⲉ 5̅0̅ⲓ̅ⲏ̅]̅ⲥ̅50 ⲡⲉⲭⲣⲏⲥⲧⲟⲥ ⲛ̅ϥ̅[ⲧ]ⲱϩ̅ⲥ̅ <text:line-break/><text:span text:style-name="T1"> </text:span><text:span text:style-name="T2">(40/14) </text:span> [ⲙ̅ⲙ]ⲁ̣ⲛ ϫⲉⲕⲁⲥⲉ ⲉⲛⲁϣϭ̣ⲛ̅ <text:line-break/><text:span text:style-name="T1"> </text:span><text:span text:style-name="T2">(40/15) </text:span> [ϭⲁ]ⲙ̣ ⲛ̅ⲕⲁⲧⲁ̣ⲡ̣ⲁⲧⲉⲓ ⲛ̅ⲧⲡ̣[ⲉ] ⲛ̣̅ⲛ̅‐ <text:line-break/><text:span text:style-name="T1"> </text:span><text:span text:style-name="T2">(40/16) </text:span> [ϩⲁϥ] ⲁ̣ⲩⲱ̣ [ⲛ̅ⲛ̅ⲁ]ⲡ̣ⲉ̣ ⲛ̅ⲛ̅ⲟ̣[ⲩ]ⲟ̣ⲟϩⲉ <text:line-break/><text:span text:style-name="T1"> </text:span><text:span text:style-name="T2">(40/17) </text:span> ⲙ̣ⲛ̣̅ ⲧϭⲁⲙ̣ [ⲧⲏⲣ]ⲥ̣̅ ⲙ̅ⲡⲇⲓⲁ̣ⲃⲟ̣ⲗ̣ⲟⲥ <text:line-break/><text:span text:style-name="T1"> </text:span><text:span text:style-name="T2">(40/18) </text:span> ϫ̣ⲉ ⲛ̣̅ⲧ̣ⲁ̣ϥ̣ [ⲡⲡ]ⲟ̣ⲓⲙⲏⲛ ⲛ̣̅[ⲡ]ⲥⲡⲉ <text:line-break/><text:span text:style-name="T1"> </text:span><text:span text:style-name="T2">(40/19) </text:span> [ⲣ]ⲙ̣ⲁ[ⲧ]ⲟⲥ [ⲁ]ⲃ̣[ⲁ]ⲗ̣ ϩⲓⲧⲟⲟⲧ̅ϥ̅ [ⲛ̅ⲧ]ⲁ̣ϩⲛ̣̅ <text:line-break/><text:span text:style-name="T1"> </text:span><text:span text:style-name="T2">(40/20) </text:span> [ⲥⲟⲩ]ⲱ̣ⲱ̣ⲛⲕ ⲁⲩ̣ⲱ ⲧ̅ⲛ̅ϯ [ⲉⲁⲩ] ⲛ̣ⲉⲕ <text:line-break/><text:span text:style-name="T1"> </text:span><text:span text:style-name="T2">(40/21) </text:span> [ⲡⲉ]ⲁ̣ⲩ̣ ⲛⲉⲕ ⲡⲓⲱⲧ ϩ̅ⲙ̅ ⲡ̣[ϣⲏⲣⲉ ⲡ] <text:line-break/><text:span text:style-name="T1"> </text:span><text:span text:style-name="T2">(40/22) </text:span> [ⲓⲱⲧ] ϩ̣[ⲙ̅] ⲡϣⲏⲣⲉ ⲡ̣ⲓ̣ⲱ̣[ⲧ ϩ̅ⲛ̅ ⲧ] <text:line-break/><text:span text:style-name="T1"> </text:span><text:span text:style-name="T2">(40/23) </text:span> [ⲉⲕⲕⲗ]ⲏ̣ⲥⲓⲁ ⲉⲧⲟⲩⲁ̣ⲁ̣ϥ̣ ⲙ̣[ⲛ̅ ⲛ̅] <text:line-break/><text:span text:style-name="T1"> </text:span><text:span text:style-name="T2">(40/24) </text:span> [ⲁⲅⲅⲉ]ⲗ̣ⲟⲥ ⲉⲧⲟⲩⲁⲁϥ ϫⲓ[ⲛ ϯ] <text:line-break/><text:span text:style-name="T1"> </text:span><text:span text:style-name="T2">(40/25) </text:span> [ⲛⲟⲩ] ϥ̣̅ϣⲟⲟⲡ ϣ̣ⲁ ⲁ̣[ⲛⲏϩⲉ] <text:line-break/><text:span text:style-name="T1"> </text:span><text:span text:style-name="T2">(40/26) </text:span> [ⲛ̅]ⲧ̣[ⲁⲓ]ⲱⲛⲓⲁ ⲛ̅ⲛ̣[ⲁⲓ]ⲱ̣ⲛ̣ [ϣⲁ] <text:line-break/><text:span text:style-name="T1"> </text:span><text:span text:style-name="T2">(40/27) </text:span> ⲛⲓ[ⲁⲛ]ⲏϩⲉ ϣ←ⲁ ⲛⲓⲁⲓⲱ̣[ⲛ] ⲛ̣̅ <text:line-break/><text:span text:style-name="T1"> </text:span><text:span text:style-name="T2">(40/28) </text:span> ⲁⲧ[ⲛ̅ⲣ]ⲉⲧⲟⲩ ⲛ̅ⲧⲉ ⲛⲓⲁⲓⲱⲛ ϩⲁ <text:line-break/><text:span text:style-name="T1"> </text:span><text:span text:style-name="T2">(40/29) </text:span> ⲙⲏⲛ̣ʹ26 </text:p>
      <text:p text:style-name="P1"/>
      <text:p text:style-name="P3">( codex XI ) 2b. On the Baptism A</text:p>
      <text:p text:style-name="P2"><text:span text:style-name="T1"> </text:span><text:span text:style-name="T2">(40/30) </text:span> ⲡ̣[ⲉⲉⲓ] ⲡ̣ⲉ ⲡⲡⲗⲏⲣⲱⲙⲁ ⲙ̅ⲡⲕⲉ <text:line-break/><text:span text:style-name="T1"> </text:span><text:span text:style-name="T2">(40/31) </text:span> ⲫⲁⲗ̣ⲁ̣ⲓⲟⲛ ⲛ̅ⲧⲅⲛⲱⲥⲓⲥ ⲡⲉⲉⲓ <text:line-break/><text:span text:style-name="T1"> </text:span><text:span text:style-name="T2">(40/32) </text:span> ⲛ̅ⲧ̣[ⲁ]ϩⲟⲩⲁⲛϩ̅ϥ̅ ⲛⲉⲛ ⲁⲃⲁⲗ ϩⲓ <text:line-break/><text:span text:style-name="T1"> </text:span><text:span text:style-name="T2">(40/33) </text:span> ⲧ̅ⲛ̣̅̅ ⲡ̣̅ⲛ̅ϫⲁⲉⲓⲥ ⲓ̅ⲏⲥ̅ ⲡⲉⲭⲣⲏⲥⲧⲟⲥ <text:line-break/><text:span text:style-name="T1"> </text:span><text:span text:style-name="T2">(40/34) </text:span> ⲡⲓⲙⲟⲛⲟⲅⲉⲛⲏⲥ ⲛⲉⲉⲓ ⲛⲉ ⲛ̅ <text:line-break/><text:span text:style-name="T1"> </text:span><text:span text:style-name="T2">(40/35) </text:span> ⲃⲉⲃⲁⲓⲟⲛ ⲁⲩⲱ ⲛ̅ⲁⲛⲁⲅⲕⲁⲓ <text:line-break/><text:span text:style-name="T1"> </text:span><text:span text:style-name="T2">(40/36) </text:span> ⲟⲛ ϫⲉⲕⲁⲥⲉ ⲉⲛⲁⲙⲁϩⲉ ⲛ̅ϩ <text:line-break/><text:span text:style-name="T1"> </text:span><text:span text:style-name="T2">(40/37) </text:span> ⲣⲏⲓ̈ ⲛ̅ϩⲏⲧⲟⲩ ⲛⲉⲉⲓ ⲛ̅ⲇⲉ ⲛⲉ <text:line-break/><text:span text:style-name="T1"> </text:span><text:span text:style-name="T2">(40/38) </text:span> ⲛⲁⲡϣⲁⲁⲣ̅ⲡ̅ ⲛ̅ⲃⲁⲡⲧⲓⲥⲙⲁ <text:line-break/><text:span text:style-name="T1"> </text:span><text:span text:style-name="T2">(41/9) </text:span> (Lines 1-9 lacking) <text:line-break/><text:span text:style-name="T1"> </text:span><text:span text:style-name="T2">(41/10) </text:span> ⲡⲧ̣[.].. ⲙ[ ⲡϣⲁⲣⲡ ⲛ̅] <text:line-break/><text:span text:style-name="T1"> </text:span><text:span text:style-name="T2">(41/11) </text:span> ⲃⲁⲡⲧⲓⲥⲙⲁ [ⲡⲉⲉⲓ ⲡⲉ ⲡⲕⲱⲉ ⲁ] <text:line-break/><text:span text:style-name="T1"> </text:span><text:span text:style-name="T2">(41/12) </text:span> ⲃⲁⲗ ⲛ̅ⲛ̅ⲛⲁⲃⲓ̣[ ⲛ̅] <text:line-break/><text:span text:style-name="T1"> </text:span><text:span text:style-name="T2">(41/13) </text:span> 〈ⲧ〉ⲁϩϫⲟⲟⲥ ϫ̣ⲉ̣ [ <text:line-break/><text:span text:style-name="T1"> </text:span><text:span text:style-name="T2">(41/14) </text:span> ⲙ̅ⲙⲱ̣ⲧ̅ⲛ̅ ⲁⲡ̣[ ⲛⲉ] <text:line-break/><text:span text:style-name="T1"> </text:span><text:span text:style-name="T2">(41/15) </text:span> ⲧ̅ⲛ̅[ⲛ]ⲁⲃⲓ ⲡⲓⲁ̣[ ϣⲟ] <text:line-break/><text:span text:style-name="T1"> </text:span><text:span text:style-name="T2">(41/16) </text:span> ⲟⲡ̣ 5̅0̅[̅ⲛ̅]̅50ⲧⲩ̣ⲡⲟⲥ ⲙ̅ⲡ̣[ <text:line-break/><text:span text:style-name="T1"> </text:span><text:span text:style-name="T2">(41/17) </text:span> ⲅⲟ[ⲥ] ⲛ̣̅ⲡⲉⲭⲣⲏⲥⲧⲟ̣[ⲥ ⲉⲧⲉ ⲡⲉⲉⲓ] <text:line-break/><text:span text:style-name="T1"> </text:span><text:span text:style-name="T2">(41/18) </text:span> ⲡ̣ⲉ̣ ⲡ̣ϣ̣ⲱϣ ⲛ̅ⲛ̣̅[ ⲛ̅ϩⲣⲏ] <text:line-break/><text:span text:style-name="T1"> </text:span><text:span text:style-name="T2">(41/19) </text:span> ⲓ̣̈ ⲛ̅ϩ̣ⲏⲧϥ̅ ⲙ̅ⲡ[ <text:line-break/><text:span text:style-name="T1"> </text:span><text:span text:style-name="T2">(41/20) </text:span> ⲫ [...] ⲛ̅ⲅⲁⲣ ⲛ̅ⲓ̅ⲏ̣̅̅[̅ⲥ̅ .]ⲉ̣[ <text:line-break/><text:span text:style-name="T1"> </text:span><text:span text:style-name="T2">(41/21) </text:span> .[..] ⲡ̣ϣⲁⲣ̅ⲡ̅ ϭ̣ⲉ̣ ⲛ̣̅ⲃ[ⲁⲡⲧⲓⲥ] <text:line-break/><text:span text:style-name="T1"> </text:span><text:span text:style-name="T2">(41/22) </text:span> [ⲙⲁ ⲡⲉⲉ]ⲓ ⲡⲉ ⲡⲕⲱⲉ̣ [ⲁⲃⲁⲗ ⲛ̅ⲛ] <text:line-break/><text:span text:style-name="T1"> </text:span><text:span text:style-name="T2">(41/23) </text:span> [ⲛⲁⲃⲓ] ⲥ̣ⲉ̣ⲓ̣ⲛ̣ⲉ ⲙ̅ⲙ[ⲁⲛ ⲁⲃⲁⲗ ϩ̅ⲛ̅] <text:line-break/><text:span text:style-name="T1"> </text:span><text:span text:style-name="T2">(41/24) </text:span> [ⲛⲉⲧ̅ⲙ̅ⲙ]ⲉ̣ⲩ ⲁⲃⲁⲗ ϩ̣ⲓ̣[ⲧⲟⲟⲧ̅ϥ̅] <text:line-break/><text:span text:style-name="T1"> </text:span><text:span text:style-name="T2">(41/25) </text:span> [ⲁϩⲟ]ⲩ̣ⲛ ⲁⲛⲁⲩⲛⲉⲙ̣ [ⲉⲧⲉ ⲡⲉⲉⲓ] <text:line-break/><text:span text:style-name="T1"> </text:span><text:span text:style-name="T2">(41/26) </text:span> [ⲡⲉ ⲁϩ]ⲟ̣ⲩⲛ ⲁⲧⲙ̅ⲛ̅[ⲧⲁⲧⲧⲉⲕⲟ] <text:line-break/><text:span text:style-name="T1"> </text:span><text:span text:style-name="T2">(41/27) </text:span> [ⲉⲧⲉ ⲡⲉ]ⲉ̣ⲓ̣ [ⲡ]ⲉ̣ ⲡⲓⲟ[ⲣⲇⲁⲛⲏⲥ] <text:line-break/><text:span text:style-name="T1"> </text:span><text:span text:style-name="T2">(41/28) </text:span> [ⲁⲗⲗ]ⲁ̣ ⲡⲓⲧⲟⲡⲟ̣[ⲥ] ⲡⲉ̣ [ⲡⲏ ⲛ̅ⲧⲉ] <text:line-break/><text:span text:style-name="T1"> </text:span><text:span text:style-name="T2">(41/29) </text:span> [ⲡ]ⲕ̣[ⲟ]ⲥ̣ⲙⲟⲥ ⲛ̅ⲧⲁ̣[ⲩⲧ̅ⲛ̅ⲛⲁⲩ] <text:line-break/><text:span text:style-name="T1"> </text:span><text:span text:style-name="T2">(41/30) </text:span> ϭⲉ̣ ⲙ̣̅ⲙⲁⲛ ⲁⲃⲁ[ⲗ] ϩ̣[ⲙ̅ ⲡⲕⲟⲥ] <text:line-break/><text:span text:style-name="T1"> </text:span><text:span text:style-name="T2">(41/31) </text:span> ⲙⲟⲥ ⲁ̣ϩⲟⲩⲛ ⲁⲡⲁⲓⲱ[ⲛ ⲑⲉⲣ] <text:line-break/><text:span text:style-name="T1"> </text:span><text:span text:style-name="T2">(41/32) </text:span> ⲙⲏⲛⲓⲁ ⲅⲁⲣ ⲛ̅ⲓ̈ⲱϩ[ⲁⲛⲛⲏⲥ] <text:line-break/><text:span text:style-name="T1"> </text:span><text:span text:style-name="T2">(41/33) </text:span> ⲡⲉ ⲡⲁⲓⲱⲛ ⲑⲉⲣⲙ[ⲏⲛⲓⲁ ⲛ̅] <text:line-break/><text:span text:style-name="T1"> </text:span><text:span text:style-name="T2">(41/34) </text:span> ⲇⲉ ⲙ̅ⲡⲏ ⲉⲧⲉ ⲡⲓⲟⲣⲇ̣[ⲁⲛⲏⲥ ⲡⲉ] <text:line-break/><text:span text:style-name="T1"> </text:span><text:span text:style-name="T2">(41/35) </text:span> 2ʹ26 2ⲡⲉ ⲧⲕⲁⲧⲁⲃⲁⲥⲓⲥ ⲉⲧⲉ̣ [ⲡⲁⲛⲁⲃⲁⲥ] <text:line-break/><text:span text:style-name="T1"> </text:span><text:span text:style-name="T2">(41/36) </text:span> 2ʹ26 2ⲙⲟⲥ ⲡⲉ ⲉⲧⲉ ⲡⲉⲉⲓ̣ [ⲡⲉ ⲡ̅ⲛ̅ⲉⲓ] <text:line-break/><text:span text:style-name="T1"> </text:span><text:span text:style-name="T2">(41/37) </text:span> 2ʹ26 2ⲁⲃⲁⲗ ϩ̅ⲙ̅ ⲡⲕⲟⲥⲙⲟ̣[ⲥ ⲁϩⲟⲩⲛ] <text:line-break/><text:span text:style-name="T1"> </text:span><text:span text:style-name="T2">(41/38) </text:span> 2ʹ26 2ⲁⲡⲁⲓⲱⲛ ʹ26 </text:p>
      <text:p text:style-name="P1"/>
      <text:p text:style-name="P3">( codex XI ) 2c. On the Baptism B</text:p>
      <text:p text:style-name="P2"><text:span text:style-name="T1"> </text:span><text:span text:style-name="T2">(42/9) </text:span> (Lines 1-9 lacking) <text:line-break/><text:span text:style-name="T1"> </text:span><text:span text:style-name="T2">(42/10) </text:span> [.....ⲁⲃⲁⲗ ϩⲙ̅ ⲡ]ⲕⲟ̣[ⲥ]ⲙ̣[ⲟ]ⲥ̣ ⲁ <text:line-break/><text:span text:style-name="T1"> </text:span><text:span text:style-name="T2">(42/11) </text:span> [ϩⲟⲩⲛ ⲁⲡⲓⲟⲣⲇⲁⲛ]ⲏ̣ⲥ ⲁⲩⲱ̣ ⲁⲃⲁⲗ <text:line-break/><text:span text:style-name="T1"> </text:span><text:span text:style-name="T2">(42/12) </text:span> [ϩ̅ⲛ̅ ⲧⲙ̅ⲛⲧ̅ⲃⲗⲗ]ⲉ̣ ⲙ̣̅ⲡⲕⲟⲥⲙⲟⲥ ⲁ <text:line-break/><text:span text:style-name="T1"> </text:span><text:span text:style-name="T2">(42/13) </text:span> [ϩⲟⲩⲛ ⲁⲡⲛⲉⲩ] ⲙ̣̅ⲡ̣ⲛⲟⲩⲧⲉ ⲁⲃⲁⲗ <text:line-break/><text:span text:style-name="T1"> </text:span><text:span text:style-name="T2">(42/14) </text:span> [ϩ̅ⲙ̅ ⲡⲥⲁⲣⲕⲓⲕⲟⲛ] ⲁϩⲟⲩⲛ ⲁ̣ⲡⲡⲛⲉⲩ̣ <text:line-break/><text:span text:style-name="T1"> </text:span><text:span text:style-name="T2">(42/15) </text:span> [ⲙⲁⲧⲓⲕⲟⲛ ⲁⲃⲁ]ⲗ̣ ϩ̅ⲛ̅ ⲫⲩ[ⲥⲓ]ⲕⲟⲛ <text:line-break/><text:span text:style-name="T1"> </text:span><text:span text:style-name="T2">(42/16) </text:span> [ⲁϩⲟⲩⲛ ⲁⲧ]ⲙ̣̅̅ⲛ̅ⲧⲁⲅⲅⲉⲗ̣ⲟ̣[ⲥ] ⲁ̣ⲃⲁⲗ <text:line-break/><text:span text:style-name="T1"> </text:span><text:span text:style-name="T2">(42/17) </text:span> [ϩ̅ⲙ̅ ⲡⲓⲥⲱⲱ]ⲛⲧ ⲁϩⲟⲩⲛ ⲁ̣[ⲡⲓ]ⲡ̣ⲗⲏ <text:line-break/><text:span text:style-name="T1"> </text:span><text:span text:style-name="T2">(42/18) </text:span> [ⲣⲱⲙⲁ ⲁⲃⲁ]ⲗ ϩ̅ⲛ̅ ⲡⲕⲟⲥⲙ[ⲟⲥ] ⲁ̣ <text:line-break/><text:span text:style-name="T1"> </text:span><text:span text:style-name="T2">(42/19) </text:span> [ϩⲟⲩⲛ ⲁⲡⲁⲓ]ⲱ̣ⲛ ⲁⲃⲁⲗ 5̅0̅ϩ̅[̅ⲛ̅50] ⲛ̅ <text:line-break/><text:span text:style-name="T1"> </text:span><text:span text:style-name="T2">(42/20) </text:span> [ⲣ̅ϩ̅ⲙ̅ϩⲉⲗ] ⲁ̣[ϩⲟⲩ]ⲛ ⲁⲩⲙ̅ⲛⲧ̣̅[ϣ]ⲏ̣ⲣ̣ⲉ <text:line-break/><text:span text:style-name="T1"> </text:span><text:span text:style-name="T2">(42/21) </text:span> [ⲁⲃⲁⲗ ϩ]ⲛ̣̅ ϩ̣ⲛ̣̅ϭⲗⲁⲗⲗ̅ⲙ̅ ⲁ[ϩⲟⲩ]ⲛ̣ <text:line-break/><text:span text:style-name="T1"> </text:span><text:span text:style-name="T2">(42/22) </text:span> [ⲁⲛⲉⲩⲉⲣ]ⲏ̣ⲩ ⲁⲃⲁⲗ ϩ̅ⲙ̅ [ⲡϫⲁⲉⲓⲉ] <text:line-break/><text:span text:style-name="T1"> </text:span><text:span text:style-name="T2">(42/23) </text:span> [ⲁϩⲟⲩⲛ ⲁ]ⲡ̣̅̅ⲛ̅ϯⲙⲉ ⲁⲃⲁ̣[ⲗ ϩ̅ⲙ̅ ⲡⲱ] <text:line-break/><text:span text:style-name="T1"> </text:span><text:span text:style-name="T2">(42/24) </text:span> [ⲣ̅ϣ̅ ⲁϩ]ⲟ̣ⲩ̣ⲛ̣ ⲁⲧϩ̅ⲙ̅[ⲙⲉ ⲁⲃⲁⲗ ϩ̅ⲛ̅] <text:line-break/><text:span text:style-name="T1"> </text:span><text:span text:style-name="T2">(42/25) </text:span> [...].[.]ⲗ̣ ⲁϩⲟⲩⲛ ⲁⲩ.[ <text:line-break/><text:span text:style-name="T1"> </text:span><text:span text:style-name="T2">(42/26) </text:span> [ 6+-]ⲁ̣ⲩⲱ ⲛ̅ⲧ̅ⲛ̅[ <text:line-break/><text:span text:style-name="T1"> </text:span><text:span text:style-name="T2">(42/27) </text:span> [ 6+-]ⲁ̣ϩⲟⲩⲛ̣ [ⲁ]ⲛ̣[ <text:line-break/><text:span text:style-name="T1"> </text:span><text:span text:style-name="T2">(42/28) </text:span> [..ⲧⲉⲉⲓ] ⲧ̣ⲉ ⲑ[ⲉ] ⲛ̣̅ⲧⲁⲩⲛ̅ⲧ̅ⲛ̣̅̅ [ⲁⲃⲁⲗ ϩ̅ⲛ̅] <text:line-break/><text:span text:style-name="T1"> </text:span><text:span text:style-name="T2">(42/29) </text:span> [ⲛ̅ⲥⲱⲙⲁ ⲛ̅ⲥⲡ]ⲉ̣ⲣⲙⲁⲧⲓⲕⲟ[ⲛ ⲁϩⲟⲩⲛ] <text:line-break/><text:span text:style-name="T1"> </text:span><text:span text:style-name="T2">(42/30) </text:span> [ⲁϩ̅ⲛ̅ⲥⲱ]ⲙ̣[ⲁ] ⲁ̣ⲩⲙⲟⲣⲫⲏ ⲛ̣̅ⲧ̣ⲉ̣ⲗⲉ[ⲓⲁ ⲛ̅] <text:line-break/><text:span text:style-name="T1"> </text:span><text:span text:style-name="T2">(42/31) </text:span> [ϩⲏⲧⲟⲩ ⲁ]ⲉⲓⲇ̣ⲩⲛⲉ ⲙ̅ⲙⲉⲛ ⲛ̣̅ⲧⲩⲡ̣ⲓ <text:line-break/><text:span text:style-name="T1"> </text:span><text:span text:style-name="T2">(42/32) </text:span> [ⲕⲱⲥ ⲙ̅ⲡⲥ]ⲉⲡⲉ ⲡⲉⲉⲓ ⲛ̅ⲧⲁⲡⲉⲭⲣ̣ⲏ <text:line-break/><text:span text:style-name="T1"> </text:span><text:span text:style-name="T2">(42/33) </text:span> [ⲥⲧⲟⲥ ⲥ̣ⲱ]ⲧ̣ⲉ ⲙ̅ⲙⲁⲛ ⲛ̅ϩⲏⲧ̅ϥ̅ ϩ̅ⲛ̅ ⲧ <text:line-break/><text:span text:style-name="T1"> </text:span><text:span text:style-name="T2">(42/34) </text:span> [ⲕⲟⲓⲛⲱⲛⲓ]ⲁ ⲙ̅ⲡⲉϥⲡⲛⲉⲩⲙⲁ ⲁⲩ <text:line-break/><text:span text:style-name="T1"> </text:span><text:span text:style-name="T2">(42/35) </text:span> [ⲱ ⲛ̅ⲧⲁϥⲉⲓ]ⲛⲉ ⲙ̅ⲙⲁⲛ ⲁⲃⲁⲗ ⲉⲧ̅ⲛ̅ <text:line-break/><text:span text:style-name="T1"> </text:span><text:span text:style-name="T2">(42/36) </text:span> [ϩⲏ ⲧ̅ϥ̅ ⲁⲩ]ⲱ̣ ϫ̅ⲙ̅ ⲡⲓⲛⲉⲩ ⲛ̅ⲯⲩⲭⲏ <text:line-break/><text:span text:style-name="T1"> </text:span><text:span text:style-name="T2">(42/37) </text:span> [ⲛⲁⲣ̅ ϩ̅ⲛ̅ⲡ]ⲛⲉⲩⲙⲁ ⲛ̅ⲧⲉⲗⲉⲓⲟⲛ <text:line-break/><text:span text:style-name="T1"> </text:span><text:span text:style-name="T2">(42/38) </text:span> [ⲉⲣⲉⲛⲉⲧ]ⲁ̣ⲩⲧⲉⲉⲓⲧⲟⲩ ϭⲉ ⲛⲉⲛ <text:line-break/><text:span text:style-name="T1"> </text:span><text:span text:style-name="T2">(42/39) </text:span> [ϩ̅ⲛ̅ ⲡϣⲁⲣ]ⲡ̣ ⲛ̅ⲃⲁⲡⲧⲓⲥⲙⲁ ⲉⲩ <text:line-break/><text:span text:style-name="T1"> </text:span><text:span text:style-name="T2">(43/13) </text:span> (Lines 1-13 lacking) <text:line-break/><text:span text:style-name="T1"> </text:span><text:span text:style-name="T2">(43/14) </text:span> [ 15+- ].[..].[ <text:line-break/><text:span text:style-name="T1"> </text:span><text:span text:style-name="T2">(43/15) </text:span> [ 6+-].[..ⲁϩⲟ]ⲣ̣ⲁ̣ⲧⲟⲛ ⲛ̅[ <text:line-break/><text:span text:style-name="T1"> </text:span><text:span text:style-name="T2">(43/16) </text:span> [..ⲉⲧⲉ ⲡ]ⲱ̣ϥ̣ ⲡⲉ ⲉⲡⲉⲓⲇⲏ̣[ <text:line-break/><text:span text:style-name="T1"> </text:span><text:span text:style-name="T2">(43/17) </text:span> [ 6+-]ⲡⲉ ⲛ̅ⲁⲛ̣[.].[ <text:line-break/><text:span text:style-name="T1"> </text:span><text:span text:style-name="T2">(43/18) </text:span> [...ϣ]ⲉϫⲉ ⲁϩ̅ⲛ̣̅̅.[ <text:line-break/><text:span text:style-name="T1"> </text:span><text:span text:style-name="T2">(43/19) </text:span> [....]ⲟ̣ⲥʹ26[ </text:p>
      <text:p text:style-name="P1"/>
      <text:p text:style-name="P3">( codex XI ) 2d. On the Eucharist A</text:p>
      <text:p text:style-name="P2"><text:span text:style-name="T1"> </text:span><text:span text:style-name="T2">(43/20) </text:span> [ⲧ̅ⲛ̅ϣ]ⲱⲡ ϩⲙⲁ̣[ⲧ ⲛ̅ⲧⲟⲟⲧ̅ⲕ̅ ⲛ̅ⲧ̅ⲛ̅ⲣ̅] <text:line-break/><text:span text:style-name="T1"> </text:span><text:span text:style-name="T2">(43/21) </text:span> [ⲉⲩⲭⲁⲣⲓ]ⲥⲧ̣ⲉⲓ ⲡⲓⲱ[ⲧ ⲉⲛⲣ̅ⲡⲙⲉⲩⲉ] <text:line-break/><text:span text:style-name="T1"> </text:span><text:span text:style-name="T2">(43/22) </text:span> [ⲉⲧⲃ]ⲉ̣ ⲡⲉⲕϣⲏⲣ̣[ⲉ ⲓ̅ⲏ̅ⲥ̅ ⲡⲉⲭⲣⲏ] <text:line-break/><text:span text:style-name="T1"> </text:span><text:span text:style-name="T2">(43/23) </text:span> [ⲥⲧⲟⲥ ϫⲉ ⲥ]ⲉⲉ̣ⲓ̣ ⲁ̣ⲃⲁ̣[ⲗ <text:line-break/><text:span text:style-name="T1"> </text:span><text:span text:style-name="T2">(43/24) </text:span> [ 8+- ⲁ]ϩ̣ⲟⲣⲁ[ⲧⲟⲛ <text:line-break/><text:span text:style-name="T1"> </text:span><text:span text:style-name="T2">(43/25) </text:span> [ 6+-]ⲁ̣ⲛ ⲛ̅ϣ[ <text:line-break/><text:span text:style-name="T1"> </text:span><text:span text:style-name="T2">(43/26) </text:span> [ 6+-]ⲙ̣̅ⲡ̅ⲕ̅ϣ[ⲏⲣⲉ <text:line-break/><text:span text:style-name="T1"> </text:span><text:span text:style-name="T2">(43/27) </text:span> [ 7+- ].̅ⲧ̅ϥ̅ⲁⲅⲁ̣[ⲡⲏ <text:line-break/><text:span text:style-name="T1"> </text:span><text:span text:style-name="T2">(43/28) </text:span> [ 6+-]ⲙ̣̅ⲙⲁⲩ̣ ⲁ̣ⲧ̣[ <text:line-break/><text:span text:style-name="T1"> </text:span><text:span text:style-name="T2">(43/29) </text:span> [ 6+-]. ⲙ̣̅[ <text:line-break/><text:span text:style-name="T1"> </text:span><text:span text:style-name="T2">(43/30) </text:span> [ 8+- ].ⲉⲩ ⲁⲧⲅ̣[ⲛⲱⲥⲓⲥ] <text:line-break/><text:span text:style-name="T1"> </text:span><text:span text:style-name="T2">(43/31) </text:span> [....]ⲥⲉ̣ⲉⲓⲣⲉ ⲙ̅ⲡⲉⲕⲟ[ⲩⲱ]ϣⲉ̣ <text:line-break/><text:span text:style-name="T1"> </text:span><text:span text:style-name="T2">(43/32) </text:span> [ϩⲓⲧ̅ⲛ̅ ⲡ]ⲣⲉⲛ ⲛ̅ⲓ̅ⲏⲥ̅ ⲡⲉⲭ[ⲣⲏⲥ]ⲧⲟⲥ <text:line-break/><text:span text:style-name="T1"> </text:span><text:span text:style-name="T2">(43/33) </text:span> [ⲁⲩⲱ ⲥⲉⲛ]ⲁ̣ⲉ̣ⲓⲣⲉ ⲙ̅ⲡⲉⲕⲟⲩⲱϣⲉ <text:line-break/><text:span text:style-name="T1"> </text:span><text:span text:style-name="T2">(43/34) </text:span> [ϯⲛⲟⲩ ⲙ̅ⲛ̅] ⲟ̣ⲩⲁⲉⲓϣ ⲛⲓⲙ ⲉⲩϫⲏⲕ <text:line-break/><text:span text:style-name="T1"> </text:span><text:span text:style-name="T2">(43/35) </text:span> [ⲁⲃⲁⲗ ⲛ̅ⲭ]ⲁⲣⲓⲥ ⲛⲓⲙ ϩⲓ ⲧⲟⲩⲃⲟ <text:line-break/><text:span text:style-name="T1"> </text:span><text:span text:style-name="T2">(43/36) </text:span> [ⲛⲓⲙ ⲡⲉ]ⲁ̣ⲩ ⲛⲉⲕ ϩⲓⲧ̅ⲛ̅ ⲡⲉⲕϣⲏ <text:line-break/><text:span text:style-name="T1"> </text:span><text:span text:style-name="T2">(43/37) </text:span> [ⲣⲉ ⲁⲩⲱ] ⲡ̣[ⲉ]ⲕ̣ⲙⲓⲥⲉ ⲓ̅ⲏ̅ⲥ̅ ⲡⲭⲣⲏ <text:line-break/><text:span text:style-name="T1"> </text:span><text:span text:style-name="T2">(43/38) </text:span> [ⲥⲧⲟⲥ ϫⲓ]ⲛ̣ [ϯⲛ]ⲟⲩ ϣⲁ ⲁⲛⲏϩⲉ ϩⲁⲙⲏⲛ </text:p>
      <text:p text:style-name="P1"/>
      <text:p text:style-name="P3">( codex XI ) 2e. On the Eucharist B</text:p>
      <text:p text:style-name="P2"><text:span text:style-name="T1"> </text:span><text:span text:style-name="T2">(44/13) </text:span> (Lines 1-13 lacking) <text:line-break/><text:span text:style-name="T1"> </text:span><text:span text:style-name="T2">(44/14) </text:span> [.]. ϩ̣ⲛ̣̅ ⲧ[ <text:line-break/><text:span text:style-name="T1"> </text:span><text:span text:style-name="T2">(44/15) </text:span> [.].̅ⲧ̅ⲙ̣ⲙⲉⲉⲩ̣ⲉ̣[.].ⲉⲩ[ <text:line-break/><text:span text:style-name="T1"> </text:span><text:span text:style-name="T2">(44/16) </text:span> [..]ⲡ̣ⲗⲟⲅⲟ̣[ⲥ] ⲙ̅ⲡⲉⲁⲙ̣[ <text:line-break/><text:span text:style-name="T1"> </text:span><text:span text:style-name="T2">(44/17) </text:span> [ 6+-ⲡⲉ]ⲧ̣ⲟⲩⲁⲁⲃ ⲡⲉ[ <text:line-break/><text:span text:style-name="T1"> </text:span><text:span text:style-name="T2">(44/18) </text:span> [ 8+- ]ⲛ̅ⲛⲉ ⲉⲙ̅ϥ̅.[ <text:line-break/><text:span text:style-name="T1"> </text:span><text:span text:style-name="T2">(44/19) </text:span> [ 8+- ⲟⲩ]ⲧⲣⲟⲫⲏ 5̅0̅ⲙ̅[̅ⲛ̅50 ⲟⲩ] <text:line-break/><text:span text:style-name="T1"> </text:span><text:span text:style-name="T2">(44/20) </text:span> [ⲥⲟⲩ 6+-]ϣⲏⲣⲉ ⲉⲕ.[ <text:line-break/><text:span text:style-name="T1"> </text:span><text:span text:style-name="T2">(44/21) </text:span> [ 6+-ⲧ]ⲣⲟⲫⲏ ⲙ̅ⲡⲧ̣[ <text:line-break/><text:span text:style-name="T1"> </text:span><text:span text:style-name="T2">(44/22) </text:span> [ 7+- ].ⲣ ⲛⲉⲛ ⲙ̅ⲡⲉ̣[ <text:line-break/><text:span text:style-name="T1"> </text:span><text:span text:style-name="T2">(44/23) </text:span> [ 7+- ]ϩ̣̅̅ⲙ̅ ⲡⲱ[ⲱ5̅0ⲛ]ϩ̣̅50[ <text:line-break/><text:span text:style-name="T1"> </text:span><text:span text:style-name="T2">(44/24) </text:span> [ 7+- ]ⲛ̅ ⲁⲩ[ <text:line-break/><text:span text:style-name="T1"> </text:span><text:span text:style-name="T2">(44/25) </text:span> [ 7+- ]ⲗ̣ⲟ ⲙ̅ⲙ̣ⲁ̣[ <text:line-break/><text:span text:style-name="T1"> </text:span><text:span text:style-name="T2">(44/26) </text:span> [ 7+- ] ⲛ̣̅ϥϣⲟⲩ̣[ϣⲟⲩ ⲉⲛ] <text:line-break/><text:span text:style-name="T1"> </text:span><text:span text:style-name="T2">(44/27) </text:span> [.....ⲉ]ⲧ̣ⲉ ⲡⲉⲉ[ⲓ ⲡⲉ <text:line-break/><text:span text:style-name="T1"> </text:span><text:span text:style-name="T2">(44/28) </text:span> [ 6+-]ⲧ̣ⲉⲕ̣ⲕ̣ⲗⲏⲥ̣[ⲓⲁ <text:line-break/><text:span text:style-name="T1"> </text:span><text:span text:style-name="T2">(44/29) </text:span> [ 11+- ].ⲩ[ <text:line-break/><text:span text:style-name="T1"> </text:span><text:span text:style-name="T2">(44/30) </text:span> [.....ⲉ]ⲕ̣ⲧⲟⲩ̣ⲃ[ⲏⲩ <text:line-break/><text:span text:style-name="T1"> </text:span><text:span text:style-name="T2">(44/31) </text:span> ..ⲕ[.ⲛ̅]ⲧ̣ⲁⲕ ⲡϫⲁⲉⲓ̣ⲥ ϩⲟ̣[ⲧⲁⲛ] <text:line-break/><text:span text:style-name="T1"> </text:span><text:span text:style-name="T2">(44/32) </text:span> ⲉⲕϣ̣[ⲁⲛ]ⲙⲟⲩ ϩ̅ⲛ̅ ⲟⲩⲧⲟ[ⲩⲃⲟ ⲕ] <text:line-break/><text:span text:style-name="T1"> </text:span><text:span text:style-name="T2">(44/33) </text:span> ⲛⲁⲧⲟⲩⲃ ⲁⲧⲣⲉϥ..[ <text:line-break/><text:span text:style-name="T1"> </text:span><text:span text:style-name="T2">(44/34) </text:span> ⲟⲩⲁⲛ ⲛⲓⲙ ⲉⲧⲛⲁϫⲓ̣ ⲙ̣[ⲁⲉⲓⲧ] <text:line-break/><text:span text:style-name="T1"> </text:span><text:span text:style-name="T2">(44/35) </text:span> 2ʹ26 2ϩⲏⲧ̅ϥ̅ ⲁⲩⲧⲣⲟⲫⲏ ⲙ̅ⲛ̣̅ [ⲟⲩⲥⲟⲩ] <text:line-break/><text:span text:style-name="T1"> </text:span><text:span text:style-name="T2">(44/36) </text:span> 2ʹ26 2ⲡⲉⲁⲩ ⲛⲉⲕ ϣⲁ ⲁⲛⲏϩ̣[ⲉ ϩⲁ] <text:line-break/><text:span text:style-name="T1"> </text:span><text:span text:style-name="T2">(44/37) </text:span> 2ʹ26 2ⲙⲏⲛ ʹ26 </text:p>
      <text:p text:style-name="P1"/>
      <text:p text:style-name="P3">( codex XI ) Allogenes</text:p>
      <text:p text:style-name="P2"><text:span text:style-name="T1"> </text:span><text:span text:style-name="T2">(45/5) </text:span> (Lines 1--5 lacking) <text:line-break/><text:span text:style-name="T1"> </text:span><text:span text:style-name="T2">(45/6) </text:span> [ 12+- ]ⲉⲩⲉ ⲛ̅ⲕ̣[ⲁ] <text:line-break/><text:span text:style-name="T1"> </text:span><text:span text:style-name="T2">(45/7) </text:span> [ⲧⲁ ⲟ]ⲩⲁ ⲛ̅ⲧⲉ̣[ⲗⲓⲟⲥ ⲁ]ⲩ̣ⲱ ⲉⲩⲕⲏ̣ <text:line-break/><text:span text:style-name="T1"> </text:span><text:span text:style-name="T2">(45/8) </text:span> [ϩ̅ⲓ̅ ⲟ]ⲩⲙⲁ ⲧⲏⲣⲟ̣ⲩ̣ [ⲉⲩϩ]ⲟ̣ⲧ̅ⲡ̅ [ⲉ]ⲡ̣ⲓ̣ <text:line-break/><text:span text:style-name="T1"> </text:span><text:span text:style-name="T2">(45/9) </text:span> [ⲛⲟⲩ]ⲥ ⲡⲓⲣⲉϥⲁⲣⲉϩ̣ ⲛ̣̅[ⲧⲁ]ⲉⲓ̣ⲧ̣ⲁ̣ⲁ̣ϥ̣ <text:line-break/><text:span text:style-name="T1"> </text:span><text:span text:style-name="T2">(45/10) </text:span> [ⲛ̅ⲧ]ⲁϥⲧⲁⲙⲟⲕ· ⲁⲩ̣[ⲱ] ϯ̣ϭⲟ̣ⲙ̣ ⲉⲧ’̣ <text:line-break/><text:span text:style-name="T1"> </text:span><text:span text:style-name="T2">(45/11) </text:span> [ϣⲟ]ⲟ̣ⲡ ⲛ̅ϩⲏⲧ̅ⲕ̅ ⲧⲉ ⲛ̅ⲧⲁⲥⲡⲟ̣[ⲣϣ̅ⲥ̅] <text:line-break/><text:span text:style-name="T1"> </text:span><text:span text:style-name="T2">(45/12) </text:span> [ⲛ̅ϣⲁ]ϫⲉ ⲟⲩⲙⲏⲏϣⲉ ⲛ̅ⲥⲟⲡ̣ <text:line-break/><text:span text:style-name="T1"> </text:span><text:span text:style-name="T2">(45/13) </text:span> [ⲡⲓⲉⲃ]ⲟ̣ⲗ̣ ϩ̅ⲙ̅ ⲡⲓϣⲙ̅ⲛⲧ’̅ϭⲟⲙ· ⲡ̣[ⲏ] <text:line-break/><text:span text:style-name="T1"> </text:span><text:span text:style-name="T2">(45/14) </text:span> [ⲛ̅ⲧⲉ ⲛⲏ] ⲧ̣ⲏⲣⲟⲩ ⲉⲧ’[ϣ]ⲟⲟⲡ ⲟ̣[ⲛ] <text:line-break/><text:span text:style-name="T1"> </text:span><text:span text:style-name="T2">(45/15) </text:span> [ⲧⲱⲥ] ⲙ̅ⲛ̅ ⲡⲓⲁⲧ’ϯ [ϣ]ⲓ̣ ⲉⲣⲟϥ ⲡⲓ̣ <text:line-break/><text:span text:style-name="T1"> </text:span><text:span text:style-name="T2">(45/16) </text:span> [ⲟⲩⲟ]ⲉⲓⲛ ϣⲁ ⲉⲛ[ⲉϩ ⲛ̅]ϯⲅⲛⲱ <text:line-break/><text:span text:style-name="T1"> </text:span><text:span text:style-name="T2">(45/17) </text:span> [ⲥⲓⲥ ⲉ]ⲧⲁⲥⲟⲩⲱ̣[ⲛ̅ϩ̅] ⲉⲃⲟⲗ· ⲡⲓ <text:line-break/><text:span text:style-name="T1"> </text:span><text:span text:style-name="T2">(45/18) </text:span> [ⲁⲗⲟ]ⲩ ⲛ̅ϩⲟⲟⲩⲧ’ [ⲙ̅]ⲡⲁⲣⲑⲉⲛⲟⲥ <text:line-break/><text:span text:style-name="T1"> </text:span><text:span text:style-name="T2">(45/19) </text:span> [ⲡϣⲟⲣ̅ⲡ̅] ⲛ̅ⲛⲉⲱⲛ ⲡⲓⲉⲃⲟⲗ ϩⲛ̅ <text:line-break/><text:span text:style-name="T1"> </text:span><text:span text:style-name="T2">(45/20) </text:span> [ⲟⲩⲉⲱ]ⲛ ⲛ̅ⲟⲩⲱⲧ’ ⲛ̅ϣⲙ̅ⲛ̅ⲧ̅’̅ <text:line-break/><text:span text:style-name="T1"> </text:span><text:span text:style-name="T2">(45/21) </text:span> [ϭⲟⲙ ⲡⲓ]ϣⲙ̅ⲛ̅ⲧ̅’̅ϭⲟⲙ ⲉⲧ’ϣ̣[ⲟ] <text:line-break/><text:span text:style-name="T1"> </text:span><text:span text:style-name="T2">(45/22) </text:span> [ⲟⲡ ⲟⲛⲧⲱ]ⲥ· ϫ̣ⲉ ⲉⲧⲁⲩϩⲟ[ⲣ] <text:line-break/><text:span text:style-name="T1"> </text:span><text:span text:style-name="T2">(45/23) </text:span> [ⲕ̅ϥ̅ ⲁⲩⲡⲟⲣ]ϣ̅〈ϥ̅〉 ⲉⲃⲟⲗ· ⲁⲩⲱ̣ <text:line-break/><text:span text:style-name="T1"> </text:span><text:span text:style-name="T2">(45/24) </text:span> [ⲉⲧⲁⲩⲡⲟⲣ]ϣ̣̅̅ϥ̅ ⲁϥⲣ̅ⲧⲉ[ⲗⲓ]ⲟ̣ⲥ· <text:line-break/><text:span text:style-name="T1"> </text:span><text:span text:style-name="T2">(45/25) </text:span> [ⲁⲩ]ⲱ̣ ⲁϥ̣ϫ̣ⲓ̣[ϭ]ⲟⲙ ⲉⲃⲟⲗ̣ [ⲛ̅ϩⲏ] <text:line-break/><text:span text:style-name="T1"> </text:span><text:span text:style-name="T2">(45/26) </text:span> [ⲧⲟⲩ ⲧ]ⲏ̣ⲣⲟⲩ· ⲉϥⲉⲓⲙ[ⲉ ⲉⲣⲟϥ] <text:line-break/><text:span text:style-name="T1"> </text:span><text:span text:style-name="T2">(45/27) </text:span> [ⲙ̅ⲛ̅ ⲡⲓⲁ]ϩⲟⲣⲁ̣[ⲧⲟⲛ] ⲙ͂ⲡ̣[ⲛ̅ⲁ] <text:line-break/><text:span text:style-name="T1"> </text:span><text:span text:style-name="T2">(45/28) </text:span> [ⲛ̅ⲧⲉⲗⲓⲟⲥ·] ⲁⲩⲱ̣ ⲁ̣ϥ̣ϣ̣[ⲱⲡⲉ] <text:line-break/><text:span text:style-name="T1"> </text:span><text:span text:style-name="T2">(45/29) </text:span> [ϩ̅ⲛ̅ ⲟⲩ]ⲉ̣ⲱⲛ· ⲉⲥⲉⲓⲙ[ⲉ ⲉⲣⲟⲥ] <text:line-break/><text:span text:style-name="T1"> </text:span><text:span text:style-name="T2">(45/30) </text:span> [ϫⲉ ⲉ]ⲥⲉⲓⲙⲉ ⲉⲡⲏ ⲉ[ⲧ̅ⲙ̅]ⲙ̣ⲁⲩ <text:line-break/><text:span text:style-name="T1"> </text:span><text:span text:style-name="T2">(45/31) </text:span> [ⲁⲩ]ⲱ̣ ⲁⲥϣⲱⲡⲉ ⲛ̅ⲕⲁⲗⲩ̣[ⲡ]ⲧ̣ⲟⲥ <text:line-break/><text:span text:style-name="T1"> </text:span><text:span text:style-name="T2">(45/32) </text:span> [ⲉⲧⲁ]ⲥ̣ⲣ̣̅ⲉ̣ⲛⲉⲣⲅⲓ ϩⲛ̅ ⲛⲏ ⲉⲧ̅ⲥ̅ <text:line-break/><text:span text:style-name="T1"> </text:span><text:span text:style-name="T2">(45/33) </text:span> [ⲥⲟ]ⲟ̣ⲩⲛ ⲙ̅ⲙⲟⲟⲩ· ⲟⲩⲡⲣⲱ <text:line-break/><text:span text:style-name="T1"> </text:span><text:span text:style-name="T2">(45/34) </text:span> [ⲧⲟ]ⲫⲁⲛⲏⲥ ⲡⲉ ⲛ̅ⲧⲉⲗⲓⲟⲥ ⲛ̅ <text:line-break/><text:span text:style-name="T1"> </text:span><text:span text:style-name="T2">(45/35) </text:span> [ⲛⲁ]ⲧⲛⲁⲩ ⲉⲣⲟϥ ⲛ̅ⲛⲟⲩⲥ <text:line-break/><text:span text:style-name="T1"> </text:span><text:span text:style-name="T2">(45/36) </text:span> [ⲛ̅ϩ]ⲁ̣̅̅ⲣ̅ⲙ̅ⲏ̅ⲇ̅ⲱ̅ⲛ̅· ⲉⲥϯ ϭⲟⲙ <text:line-break/><text:span text:style-name="T1"> </text:span><text:span text:style-name="T2">(45/37) </text:span> [ⲇⲉ] ⲛ̅ⲛⲓⲕⲁⲧⲁ ⲟⲩⲁ· ⲟⲩ̅ⲅ̅ ϩⲟ <text:line-break/><text:span text:style-name="T1"> </text:span><text:span text:style-name="T2">(45/38) </text:span> [ⲟⲩ]ⲧ’ ⲧⲉ̣ ⲉⲥⲟ ⲇⲉ ⲕⲁⲧⲁ ⲟⲩⲁ <text:line-break/><text:span text:style-name="T1"> </text:span><text:span text:style-name="T2">(46/5) </text:span> (Lines 1--5 lacking) <text:line-break/><text:span text:style-name="T1"> </text:span><text:span text:style-name="T2">(46/6) </text:span> ⲉ̣ⲩ̣ⲕⲁ[ⲧⲁ ⲟⲩⲁ ⲙⲉⲛ ⲉⲩϩ̅ⲓ̅ ⲟⲩ] <text:line-break/><text:span text:style-name="T1"> </text:span><text:span text:style-name="T2">(46/7) </text:span> ⲙⲁ ⲇⲉ [ϫⲉ ⲉⲥ]ⲟ̣ ⲛ̣̅ⲟⲩϩ̣[ⲩⲡⲁⲣ] <text:line-break/><text:span text:style-name="T1"> </text:span><text:span text:style-name="T2">(46/8) </text:span> ⲝⲓ̣ⲥ̣ ⲛ̅ⲧ[ⲉ ⲛⲁⲓ̈] ⲁ̣ⲩⲱ ⲉⲥⲛ[ⲁⲩ] <text:line-break/><text:span text:style-name="T1"> </text:span><text:span text:style-name="T2">(46/9) </text:span> ⲉⲛ̣ⲏ̣ ⲧⲏ̣[ⲣ]ⲟ̣ⲩ̣ 〈ⲉⲩϣⲟⲟⲡ〉 ⲟⲛⲧⲱⲥ ⲟ[ⲛ] <text:line-break/><text:span text:style-name="T1"> </text:span><text:span text:style-name="T2">(46/10) </text:span> ⲟⲩ̣ⲛ̣̅ⲧⲁ̣[ⲥ] ⲙ̣̅ⲙⲁⲩ ⲙ̅ⲡⲓⲁⲩ[ⲧⲟⲅⲉ] <text:line-break/><text:span text:style-name="T1"> </text:span><text:span text:style-name="T2">(46/11) </text:span> [ⲛ]ⲏⲥ ⲛ̅ⲛ̣ⲟ̣ⲩⲧⲉ· ⲉⲧⲁⲥⲉ̣[ⲓⲙⲉ] <text:line-break/><text:span text:style-name="T1"> </text:span><text:span text:style-name="T2">(46/12) </text:span> ⲉⲧⲉⲧⲉ ⲧⲱⲥ ⲛ̅ϩⲩⲡⲁ[ⲣⲝⲓⲥ] <text:line-break/><text:span text:style-name="T1"> </text:span><text:span text:style-name="T2">(46/13) </text:span> ⲁⲩⲱ ⲛ̅ⲧⲁⲣⲉⲥⲁϩⲉⲣⲁⲧ[ⲥ̅ ⲁⲥⲛ̅] <text:line-break/><text:span text:style-name="T1"> </text:span><text:span text:style-name="T2">(46/14) </text:span> ⲡⲁⲓ̈ ⲉⲁϥ̣ⲛⲁⲩ ⲉⲛⲏ ⲧ[ⲏⲣⲟⲩ ⲉⲩ] <text:line-break/><text:span text:style-name="T1"> </text:span><text:span text:style-name="T2">(46/15) </text:span> ϣⲟⲟⲡ̣ [ⲕ]ⲁⲧⲁ ⲟⲩⲁ ⲛ̅ⲑ̣[ⲉ ⲉⲧ̅ϥ̅] <text:line-break/><text:span text:style-name="T1"> </text:span><text:span text:style-name="T2">(46/16) </text:span> ϣⲟⲟ̣[ⲡ ⲙ̅]ⲙⲟⲥ· ⲁⲩⲱ ⲉ̣[ⲧⲁⲩ] <text:line-break/><text:span text:style-name="T1"> </text:span><text:span text:style-name="T2">(46/17) </text:span> ϣⲱⲡ[ⲉ ⲉⲛ]ⲧⲟϥ ⲡⲉ· ⲉ̣[ⲩⲛⲁ] <text:line-break/><text:soft-page-break/><text:span text:style-name="T1"> </text:span><text:span text:style-name="T2">(46/18) </text:span> ⲛⲁⲩ ⲉⲡⲓ̣[ϣ]ⲙ̣̅̅ⲛ̅ⲧ̅’̅ϩⲟⲟⲩ̣[ⲧ’ ⲛ̅] <text:line-break/><text:span text:style-name="T1"> </text:span><text:span text:style-name="T2">(46/19) </text:span> ⲛⲟⲩⲧⲉ· ϯϭⲟⲙ ⲉⲧ’ϫ[ⲟⲥⲉ ⲉ] <text:line-break/><text:span text:style-name="T1"> </text:span><text:span text:style-name="T2">(46/20) </text:span> ⲡⲛⲟⲩⲧⲉ· ⲧⲉⲛ[ⲛⲟⲓⲁ ⲧⲉ] <text:line-break/><text:span text:style-name="T1"> </text:span><text:span text:style-name="T2">(46/21) </text:span> ⲛ̣̅ⲧⲉ ⲛⲁⲓ̈ ⲧⲏⲣⲟⲩ ⲉⲧ’ϣ̣[ⲟⲟⲡ] <text:line-break/><text:span text:style-name="T1"> </text:span><text:span text:style-name="T2">(46/22) </text:span> [ϩ̅]̅ⲓ̣̅̅ ⲟⲩⲙⲁ ⲉϥϣⲁ̣[ⲛⲙⲟϣⲧⲟⲩ] <text:line-break/><text:span text:style-name="T1"> </text:span><text:span text:style-name="T2">(46/23) </text:span> [ⲉϥ]ⲙⲟⲩϣ̅ⲧ̅’̅ ⲙ̣̅[ⲡⲓⲡⲣⲱⲧⲟⲫⲁ] <text:line-break/><text:span text:style-name="T1"> </text:span><text:span text:style-name="T2">(46/24) </text:span> ⲛⲏⲥ ⲛ̣̅ⲛⲟϭ ⲛ̅ϩⲟⲟ̣[ⲩⲧ’ <text:line-break/><text:span text:style-name="T1"> </text:span><text:span text:style-name="T2">(46/25) </text:span> [.].[...ⲛ]ⲟ̣ⲩⲥ· ϯϣ̣[ⲟ]ⲣ̣[ⲡ̅ ⲛ̅] <text:line-break/><text:span text:style-name="T1"> </text:span><text:span text:style-name="T2">(46/26) </text:span> [ϩ̅ⲓ̅ⲏ ⲛ̅]ⲧⲉ ⲛⲁⲓ̈ ⲉϣⲱⲡ̣[ⲉ ⲉϥ] <text:line-break/><text:span text:style-name="T1"> </text:span><text:span text:style-name="T2">(46/27) </text:span> [ϣⲁ]ⲛ̣ⲛ̣ⲁ̣ⲩ̣ ⲉⲣⲟⲥ [ⲉϥⲛⲁⲩ] <text:line-break/><text:span text:style-name="T1"> </text:span><text:span text:style-name="T2">(46/28) </text:span> [ⲟⲛ ⲉⲛⲓⲟ]ⲛ̣ ⲧ̣[ⲱ]ⲥ [ⲉⲧ’ϣⲟⲟⲡ] <text:line-break/><text:span text:style-name="T1"> </text:span><text:span text:style-name="T2">(46/29) </text:span> [ⲉϯ]ϣ̣ⲟⲣ̅ⲡ̅ ⲛ̅ϩ̅ⲓ̅ⲏ ⲇ[ⲉ ⲛ̅ⲛⲏ ⲉⲧ] <text:line-break/><text:span text:style-name="T1"> </text:span><text:span text:style-name="T2">(46/30) </text:span> ϩ̅ⲓ̣̅̅ [ⲟⲩ]ⲙⲁ· ⲡⲏ ⲇⲉ ⲉⲧⲁ[ϥⲛⲁⲩ] <text:line-break/><text:span text:style-name="T1"> </text:span><text:span text:style-name="T2">(46/31) </text:span> ⲉⲛ̣[ⲁ]ⲓ̣̈ ⲁϥⲛⲁⲩ ⲉⲡⲓⲕⲁⲗ̣[ⲩⲡⲧⲟⲥ] <text:line-break/><text:span text:style-name="T1"> </text:span><text:span text:style-name="T2">(46/32) </text:span> ⲉϣⲱⲡⲉ ⲇⲉ ⲉϥϣⲁ̣ⲛ̣ⲛ̣[ⲁⲩ ⲉ] <text:line-break/><text:span text:style-name="T1"> </text:span><text:span text:style-name="T2">(46/33) </text:span> ⲡⲟⲩⲁ ⲛ̅ⲧⲉ ⲛⲓⲕⲁⲗⲩⲡⲧ[ⲟⲥ ⲉϥ] <text:line-break/><text:span text:style-name="T1"> </text:span><text:span text:style-name="T2">(46/34) </text:span> ⲛⲁⲩ ⲉⲡⲓⲉⲱⲛ ⲛ̅ⲃ̅ⲁ̅ⲣ̅ⲃ̅ⲁ̅ⲗ̅ⲱ̣̅̅ [ⲡⲓ] <text:line-break/><text:span text:style-name="T1"> </text:span><text:span text:style-name="T2">(46/35) </text:span> ϫⲡⲟ ⲇⲉ ⲛ̅ⲛⲁⲧⲙⲓⲥⲉ ⲛ̅ⲧ̣[ⲉ ⲡⲏ] <text:line-break/><text:span text:style-name="T1"> </text:span><text:span text:style-name="T2">(46/36) </text:span> ⲉϣⲱⲡⲉ ⲉⲣϣⲁⲛⲟⲩⲁ ⲛ̣[ⲁⲩ] <text:line-break/><text:span text:style-name="T1"> </text:span><text:span text:style-name="T2">(46/37) </text:span> ⲉⲣⲟϥ ϫⲉ ⲡⲱⲥ ⲉϣⲁϥⲱ̣[ⲛ̅ϩ̅] <text:line-break/><text:span text:style-name="T1"> </text:span><text:span text:style-name="T2">(47/4) </text:span> (Lines 1--4 lacking) <text:line-break/><text:span text:style-name="T1"> </text:span><text:span text:style-name="T2">(47/5) </text:span> [ 7+- ⲁⲕⲥⲱⲧ]ⲙ̣̅ [ⲉⲧⲃⲉ ⲧ] <text:line-break/><text:span text:style-name="T1"> </text:span><text:span text:style-name="T2">(47/6) </text:span> ⲡ̣ⲉ̣ⲣ̣[ⲓ]ⲟ̣ⲩⲥ̣[ⲓⲁ ⲙ̅ⲡ]ⲟⲩⲁ ⲡⲟⲩⲁ <text:line-break/><text:span text:style-name="T1"> </text:span><text:span text:style-name="T2">(47/7) </text:span> ⲙ̅ⲙⲟⲟⲩ ϩ̅ⲛ̅ ⲟ̣[ⲩⲧⲁ]ϫ̣ⲣⲟ· ⲉⲧⲃⲉ̣ <text:line-break/><text:span text:style-name="T1"> </text:span><text:span text:style-name="T2">(47/8) </text:span> ⲡⲓϣⲙ̅ⲛ̅ⲧ’ϭⲟⲙ̣ [ⲇⲉ] ⲛ̣̅ⲁϩⲟ̣ⲣ̣[ⲁ]ⲧⲟ[ⲛ] <text:line-break/><text:span text:style-name="T1"> </text:span><text:span text:style-name="T2">(47/9) </text:span> ⲙ̅ⲡ̅ⲛ̅ⲁ̅ ⲥⲱⲧ̅ⲙ̅· [ϥϣ]ⲟⲟ[ⲡ] ⲉⲟⲩ̣[ⲁ] <text:line-break/><text:span text:style-name="T1"> </text:span><text:span text:style-name="T2">(47/10) </text:span> ⲡⲉ ⲛ̅ⲛⲁⲧⲛⲁⲩ ⲉⲣ̣[ⲟϥ ⲉϥ]ⲟ ⲛ̣̅ⲛⲁ̣[ⲧ’] <text:line-break/><text:span text:style-name="T1"> </text:span><text:span text:style-name="T2">(47/11) </text:span> ⲧⲁϩⲟϥ ⲛⲁⲩ ⲧⲏⲣⲟ̣ⲩ ⲉ̣ⲟⲩⲛ̅ <text:line-break/><text:span text:style-name="T1"> </text:span><text:span text:style-name="T2">(47/12) </text:span> ⲧ̣ⲁ̣ϥ̣ ⲛ̅ⲛⲏ ⲧⲏⲣⲟⲩ ϩⲣⲁⲓ̈ ⲛ̅ϩⲏⲧ[ϥ̅] <text:line-break/><text:span text:style-name="T1"> </text:span><text:span text:style-name="T2">(47/13) </text:span> [ⲉⲩ]ϣ̣ⲟⲟⲡ ⲅⲁⲣ ⲧⲏⲣⲟⲩ ⲉⲧⲃ[ⲏ] <text:line-break/><text:span text:style-name="T1"> </text:span><text:span text:style-name="T2">(47/14) </text:span> [ⲏⲧ̅ϥ̅· ⲟ]ⲩ̣ⲧⲉⲗⲓⲟⲛ ⲡⲉ̣ ⲁⲩⲱ ⲉ <text:line-break/><text:span text:style-name="T1"> </text:span><text:span text:style-name="T2">(47/15) </text:span> [ⲛⲉ]ⲁϥ ⲉⲧⲉⲗⲓⲟⲥ· ⲁ[ⲩ]ⲱ̣ ⲉⲩⲙⲁ <text:line-break/><text:span text:style-name="T1"> </text:span><text:span text:style-name="T2">(47/16) </text:span> ⲕⲁⲣⲓⲟⲥ ⲡⲉ· ⲉⲟⲩ̣[ⲁ ⲡ]ⲉ ⲛ̅ⲟⲩⲟ <text:line-break/><text:span text:style-name="T1"> </text:span><text:span text:style-name="T2">(47/17) </text:span> ⲉⲓϣ ⲛⲓⲙ· ⲁⲩⲱ̣ [ⲉϥ]ϣⲟⲟⲡ ⲛ̅ <text:line-break/><text:span text:style-name="T1"> </text:span><text:span text:style-name="T2">(47/18) </text:span> [ϩⲏⲧⲟ]ⲩ ⲧⲏⲣⲟⲩ· ⲉⲩ̣ⲁⲧ’ϣⲁϫⲉ <text:line-break/><text:span text:style-name="T1"> </text:span><text:span text:style-name="T2">(47/19) </text:span> [ⲙ̅ⲙ]ⲟ̣ϥ̣ [ⲡ]ⲉ ⲛ̅ⲛⲁⲧ’ϯ ⲣⲁⲛ ⲉⲣⲟϥ <text:line-break/><text:span text:style-name="T1"> </text:span><text:span text:style-name="T2">(47/20) </text:span> [ⲉⲟⲩⲁ] ⲡ̣ⲉ ⲉϥϣⲟⲟⲡ ⲉⲃⲟⲗ ϩ̅ⲓ̣̅̅ <text:line-break/><text:span text:style-name="T1"> </text:span><text:span text:style-name="T2">(47/21) </text:span> [ⲧⲟⲟⲧⲟ]ⲩ̣ ⲧⲏ̣ⲣ̣ⲟⲩ· ⲡⲏ ⲉⲧⲉ̣ [ⲉ] <text:line-break/><text:span text:style-name="T1"> </text:span><text:span text:style-name="T2">(47/22) </text:span> [ϣⲱⲡⲉ ⲉⲣϣⲁ]ⲛ̣ⲟⲩⲁ ⲣ̅ⲛⲟⲉ[ⲓ ⲙ̅] <text:line-break/><text:span text:style-name="T1"> </text:span><text:span text:style-name="T2">(47/23) </text:span> [ⲙⲟϥ ⲙⲉϥⲟⲩ]ⲉ̣ϣ̣ ⲗⲁⲁⲩ ⲉϥ <text:line-break/><text:span text:style-name="T1"> </text:span><text:span text:style-name="T2">(47/24) </text:span> [ϣⲟⲟⲡ ϩⲁⲧ]ⲉϥⲉϩⲏ ⲛ̅ⲧ̣[ⲉ] ⲛ̣ⲏ <text:line-break/><text:span text:style-name="T1"> </text:span><text:span text:style-name="T2">(47/25) </text:span> [ⲉⲧⲉ ⲟⲩⲛ̅ⲧⲁ]ⲩ ⲛ̅ⲛⲟ̣ⲩϩ̣[ⲩ]ⲡ̣ⲁⲣ <text:line-break/><text:span text:style-name="T1"> </text:span><text:span text:style-name="T2">(47/26) </text:span> [ⲝⲓⲥ· ⲛ̅ⲧⲟϥ] ⲅ̣ⲁ̣ⲣ̣ ⲡ̣ⲉ̣ ⲧ’ⲡ̣[ⲏⲅ]ⲏ <text:line-break/><text:span text:style-name="T1"> </text:span><text:span text:style-name="T2">(47/27) </text:span> [ⲛ̅ⲧⲁⲩⲧⲁⲩⲟⲟⲩ ⲧⲏⲣ]ⲟⲩ̣ ⲉ̣ⲃ̣ⲟⲗ <text:line-break/><text:span text:style-name="T1"> </text:span><text:span text:style-name="T2">(47/28) </text:span> [ⲛ̅ϩⲏⲧ̅ⲥ̅· ⲉⲩϣⲟⲣ̅ⲡ̅ ⲡⲉ ϩⲁⲑⲏ ⲛ̅] <text:line-break/><text:span text:style-name="T1"> </text:span><text:span text:style-name="T2">(47/29) </text:span> [ⲧⲙ̅ⲛ̅ⲧ̅’̅ⲧⲉ]ⲗ̣ⲓ̣ⲟ̣ⲥ̣ ⲛ̣ⲉ̣[ⲩϣⲟⲣ̅ⲡ̅ ⲡⲉ] <text:line-break/><text:span text:style-name="T1"> </text:span><text:span text:style-name="T2">(47/30) </text:span> [ϩⲁⲑⲏ ⲙ̅]ⲙ̅ⲛ̅ⲧ̅ⲛⲟⲩⲧ[ⲉ ⲛⲓⲙ·] <text:line-break/><text:soft-page-break/><text:span text:style-name="T1"> </text:span><text:span text:style-name="T2">(47/31) </text:span> ⲁ[ⲩⲱ] ⲉⲩϣⲟⲣ̅ⲡ̅ ⲡⲉ ϩⲁ[ⲑⲏ ⲙ̅] <text:line-break/><text:span text:style-name="T1"> </text:span><text:span text:style-name="T2">(47/32) </text:span> ⲙⲛ̣[ⲧ’]ⲙ̣ⲁ̣ⲕ̣ⲁⲣⲓⲟⲥ ⲛⲓⲙ[·] ⲉ̣ϥ <text:line-break/><text:span text:style-name="T1"> </text:span><text:span text:style-name="T2">(47/33) </text:span> ⲥⲁϩⲛⲉ̣ ⲛ̣̅ⲥⲁ ϭⲟⲙ ⲛⲓⲙ· ⲁⲩⲱ <text:line-break/><text:span text:style-name="T1"> </text:span><text:span text:style-name="T2">(47/34) </text:span> ⲟ̣ⲩⲟⲩⲥⲓⲁ 〈ⲡⲉ〉 ⲉⲩⲙ̅ⲛ̅ⲧ̅’̅ⲁⲧⲟⲩⲥⲓⲁ <text:line-break/><text:span text:style-name="T1"> </text:span><text:span text:style-name="T2">(47/35) </text:span> ⲡⲉ ⲉⲩⲛⲟⲩⲧⲉ ⲡⲉ ⲉⲙ̅ⲛ̅ ⲙ̅ⲛ̅ <text:line-break/><text:span text:style-name="T1"> </text:span><text:span text:style-name="T2">(47/36) </text:span> ⲧⲛⲟⲩⲧⲉ ϩ̅ⲓ̅ϫⲱϥ· ⲡⲏ ⲉⲧⲉ· <text:line-break/><text:span text:style-name="T1"> </text:span><text:span text:style-name="T2">(47/37) </text:span> ⲡⲓϩⲟⲩⲉ ⲟⲩⲱⲧ̅ⲃ̅ ⲛ̅ⲧⲉ ⲧⲉϥ <text:line-break/><text:span text:style-name="T1"> </text:span><text:span text:style-name="T2">(47/38) </text:span> ⲙ̅ⲛ̅ⲧ̅’̅ⲛⲟϭ ⲙ̅ⲛ̅ ϯⲙ̅ⲛⲧ’̅ⲥⲁⲉⲓ〈ⲉ〉· <text:line-break/><text:span text:style-name="T1"> </text:span><text:span text:style-name="T2">(48/5) </text:span> (Lines 1--5 lacking) <text:line-break/><text:span text:style-name="T1"> </text:span><text:span text:style-name="T2">(48/6) </text:span> [ϭ]ⲁ̣ⲙ̣[·] ⲟ̣ⲩⲁ[ⲧ’ϭⲁⲙ ⲁⲛ] ⲧ̣[ⲉ ⲛ̅ⲧⲁⲩ] <text:line-break/><text:span text:style-name="T1"> </text:span><text:span text:style-name="T2">(48/7) </text:span> ⲉ̣ϫⲓ ⲛ̅ⲟⲩⲱⲛ[ϩ̅ ⲉ]ⲃ̣ⲟⲗ ⲛ̅ⲧ̣[ⲉ] ⲛ̣ⲁⲓ%9 <text:line-break/><text:span text:style-name="T1"> </text:span><text:span text:style-name="T2">(48/8) </text:span> ⲉϣⲱⲡⲉ [ⲉⲩϣ]ⲁⲛⲉⲓ ⲉⲩⲙⲁ· <text:line-break/><text:span text:style-name="T1"> </text:span><text:span text:style-name="T2">(48/9) </text:span> ⲉⲡ̣ⲓⲇⲏ [ⲟⲩⲙ]ⲛ̣ⲧ’ⲁⲧ’ϭⲁⲙ ⲧⲉ ⲛ̅ <text:line-break/><text:span text:style-name="T1"> </text:span><text:span text:style-name="T2">(48/10) </text:span> ⲧⲉ ⲛ̣ⲓⲕ̣[ⲁⲧⲁ ⲟ]ⲩⲁ ⲉⲧⲁϩⲉ ⲡⲧⲏⲣ̅ϥ̅ <text:line-break/><text:span text:style-name="T1"> </text:span><text:span text:style-name="T2">(48/11) </text:span> ⲉⲧ’ⲕ[ⲏ ϩ]ⲙ̣̅ [ⲡ]ⲙⲁ ⲉⲧ’ϫⲟⲥⲉ ⲉⲧⲉ <text:line-break/><text:span text:style-name="T1"> </text:span><text:span text:style-name="T2">(48/12) </text:span> ⲗ̣ⲓⲟⲥ· ⲉϣⲁⲩϫⲓ ⲇⲉ ⲉⲃⲟⲗ ϩ̅ⲓ̅ⲧⲟ <text:line-break/><text:span text:style-name="T1"> </text:span><text:span text:style-name="T2">(48/13) </text:span> ⲟ̣ⲧ̅ⲥ̅ ⲛ̅ⲟⲩϣⲟⲣ̅ⲡ̅ ⲛ̅ⲉⲛⲛ[ⲟ]ⲓ̣ⲁ̣· <text:line-break/><text:span text:style-name="T1"> </text:span><text:span text:style-name="T2">(48/14) </text:span> [ⲛ̅]ⲑⲉ ⲙ̅ⲡ̣ϣⲱⲡⲉ ⲁⲛ· ⲁ̣ⲗ̣[ⲗⲁ ⲣⲱ] <text:line-break/><text:span text:style-name="T1"> </text:span><text:span text:style-name="T2">(48/15) </text:span> ⲉϥϯ ⲙ̅[ⲡ]ϣⲱⲡⲉ ⲙ̅ⲛ̅ [ⲡ]ⲏ̣ [ⲉⲧ’] <text:line-break/><text:span text:style-name="T1"> </text:span><text:span text:style-name="T2">(48/16) </text:span> ϩⲏⲡ ⲛ̅ⲧ̣[ⲉ] ⲑⲩⲡⲁⲣⲝⲓⲥ· ⲉϥⲥ̣[ⲁϩ] <text:line-break/><text:span text:style-name="T1"> </text:span><text:span text:style-name="T2">(48/17) </text:span> ⲛⲉ ⲛ̅ⲥⲱ̣[ϥ ⲛ̅]ϩ̣ⲱⲃ ⲛⲓⲙ· ϫⲉ ⲡⲏ <text:line-break/><text:span text:style-name="T1"> </text:span><text:span text:style-name="T2">(48/18) </text:span> ⲛ̅ⲧⲟϥ ⲉ[ⲧⲉ]ϥ̣ⲉ̣ϣⲱⲡⲉ ⲉϥϣ̣ⲁ̣ⲛ̣ <text:line-break/><text:span text:style-name="T1"> </text:span><text:span text:style-name="T2">(48/19) </text:span> ⲣ̅ⲛⲟⲉⲓ ⲙ̅ⲙⲟϥ· ⲡⲁⲓ̈ ⲇⲉ ⲡⲉ̣ [ⲟⲩⲁ] <text:line-break/><text:span text:style-name="T1"> </text:span><text:span text:style-name="T2">(48/20) </text:span> ⲉϥⲕⲏ ⲉϩⲣⲁⲓ̈ ⲛ̅ⲟⲩⲗⲁ̣[ⲉⲓϭⲉ ⲛ̅ϣⲱ] <text:line-break/><text:span text:style-name="T1"> </text:span><text:span text:style-name="T2">(48/21) </text:span> [ⲡ]ⲉ ⲙ̅ⲛ̅ ⲟⲩⲡⲏⲅⲏ· ⲁⲩⲱ̣ [ⲟⲩϩⲩ] <text:line-break/><text:span text:style-name="T1"> </text:span><text:span text:style-name="T2">(48/22) </text:span> [ⲗ]ⲏ ⲛ̅ⲛⲁⲧ’ϩⲩⲗⲏ̣ [ⲙ̅ⲛ̅ ⲟⲩⲏⲡⲉ] <text:line-break/><text:span text:style-name="T1"> </text:span><text:span text:style-name="T2">(48/23) </text:span> ⲛ̣̅ⲁⲧ’ⲏⲡⲉ [ⲙ̅ⲛ̅ ⲟⲩⲉⲓⲇⲟⲥ ⲛ̅ⲁⲧ’] <text:line-break/><text:span text:style-name="T1"> </text:span><text:span text:style-name="T2">(48/24) </text:span> ⲉⲓⲇⲟ̣ⲥ̣[·] ⲙ̅ⲛ̅ ⲟⲩⲙ̣[ⲟⲣⲫⲏ ⲛ̅ⲁⲧ’] <text:line-break/><text:span text:style-name="T1"> </text:span><text:span text:style-name="T2">(48/25) </text:span> ⲙⲟ̣[ⲣ]ⲫ̣ⲏ· ⲙ̅ⲛ̅ ⲟ[ⲩⲁⲧ’ϭⲁⲙ ⲙ̅ⲛ̅] <text:line-break/><text:span text:style-name="T1"> </text:span><text:span text:style-name="T2">(48/26) </text:span> ⲟⲩ̣[ϭ]ⲁ̣ⲙ[· ⲙ]ⲛ̣̅ ⲟ̣[ⲩⲟⲩⲥⲓⲁ ⲛ̅ⲁⲧ’] <text:line-break/><text:span text:style-name="T1"> </text:span><text:span text:style-name="T2">(48/27) </text:span> ⲟⲩ̣[ⲥ]ⲓ̣[ⲁ ⲙ̅ⲛ̅ ⲟⲩ <text:line-break/><text:span text:style-name="T1"> </text:span><text:span text:style-name="T2">(48/28) </text:span> [ 6+- ⲙ̅ⲛ̅ ⲟⲩⲉⲛⲉⲣⲅⲓⲁ] <text:line-break/><text:span text:style-name="T1"> </text:span><text:span text:style-name="T2">(48/29) </text:span> [ⲛ̅ⲁⲧⲉⲛ]ⲉ̣ⲣ̣ⲅ̣ⲓ̣ⲁ̣ ⲁ̣[ⲗⲗⲁ ⲉϥⲉ] <text:line-break/><text:span text:style-name="T1"> </text:span><text:span text:style-name="T2">(48/30) </text:span> [ⲛ̅ⲟⲩⲣⲉ]ϥ̣ⲥⲁϩⲛⲉ ⲛ̣̅[ⲧⲉ ϩ̅ⲛ̅ⲥⲁϩ] <text:line-break/><text:span text:style-name="T1"> </text:span><text:span text:style-name="T2">(48/31) </text:span> ⲛ̣[ⲉ ⲙ]ⲛ̣̅ ⲟⲩⲙⲛ̣̅ⲧⲛⲟⲩⲧ[ⲉ ⲛ̅]ⲧ̣ⲉ <text:line-break/><text:span text:style-name="T1"> </text:span><text:span text:style-name="T2">(48/32) </text:span> ⲧⲙ̅ⲛ̣̅̅ⲧ’̣ⲛⲟⲩⲧⲉ ⲁⲗ̣[ⲗ]ⲁ̣ [ⲉ]ϣⲱ <text:line-break/><text:span text:style-name="T1"> </text:span><text:span text:style-name="T2">(48/33) </text:span> ⲡⲉ ⲉⲩϣⲁⲛϫⲓ ⲉϣⲁⲩϫⲓ ⲉⲃ̣ⲟ̣ⲗ̣ <text:line-break/><text:span text:style-name="T1"> </text:span><text:span text:style-name="T2">(48/34) </text:span> ϩ̅ⲛ̅ ⲧϣⲟⲣ̅ⲡ̅ ⲙ̅ⲙ̅ⲛ̅ⲧ’ⲱⲛ̅ϩ̅· ⲙ̅ⲛ̅ <text:line-break/><text:span text:style-name="T1"> </text:span><text:span text:style-name="T2">(48/35) </text:span> ⲟⲩⲉⲛⲉⲣⲅⲓⲁ ⲛ̅ⲁⲧ’ⲡⲱⲣ̅ϫ̅· <text:line-break/><text:span text:style-name="T1"> </text:span><text:span text:style-name="T2">(48/36) </text:span> ⲟⲩϩⲩⲡⲟⲥⲧⲁⲥⲓⲥ ⲛ̅ⲧⲉ ⲧϣⲟ <text:line-break/><text:span text:style-name="T1"> </text:span><text:span text:style-name="T2">(48/37) </text:span> ⲣ̅ⲡ̅ ⲛ̅ⲧⲉ ⲡⲟⲩⲁ ⲉⲧ’ϣⲟⲟⲡ <text:line-break/><text:span text:style-name="T1"> </text:span><text:span text:style-name="T2">(48/38) </text:span> ⲟⲛⲧⲱⲥ· ⲟⲩⲙⲁϩⲥ̅ⲛ̅ⲧⲉ ⲇⲉ <text:line-break/><text:span text:style-name="T1"> </text:span><text:span text:style-name="T2">(49/1) </text:span> ⲛ̣͂ⲉⲛ̣ⲉⲣⲅⲓⲁ ⲉ[ <text:line-break/><text:span text:style-name="T1"> </text:span><text:span text:style-name="T2">(49/2) </text:span> [..]ⲇ̣ⲉ ⲡⲉ ⲡⲉ̣[ <text:line-break/><text:span text:style-name="T1"> </text:span><text:span text:style-name="T2">(49/3) </text:span> [.....]ⲟⲩ̣ⲧ̣[ <text:line-break/><text:span text:style-name="T1"> </text:span><text:span text:style-name="T2">(49/4) </text:span> [ <text:line-break/><text:span text:style-name="T1"> </text:span><text:span text:style-name="T2">(49/5) </text:span> [.....]...[.....ⲟ]ⲩ̣ⲛ̣̅ⲧ̣[ⲁϥ ⲛ̅] <text:line-break/><text:soft-page-break/><text:span text:style-name="T1"> </text:span><text:span text:style-name="T2">(49/6) </text:span> ⲟⲩⲙ̅ⲛ̅ⲧ̅’̅ⲙⲁⲕ̣[ⲁⲣⲓⲟⲥ] ⲙ̅ⲛ̅ ⲟⲩⲙ̣[ⲛ̅ⲧ’̅] <text:line-break/><text:span text:style-name="T1"> </text:span><text:span text:style-name="T2">(49/7) </text:span> ⲁⲅⲁⲑⲟⲥ· ϫⲉ̣ [ⲉϣⲱ]ⲡⲉ ⲉⲩϣ[ⲁⲛ] <text:line-break/><text:span text:style-name="T1"> </text:span><text:span text:style-name="T2">(49/8) </text:span> ⲣ̅ⲛⲟⲉⲓ ⲙ̅ⲙⲟϥ ⲙ̣̅[ⲡⲓⲣⲉ]ϥϫⲓⲟⲟⲣ̣ <text:line-break/><text:span text:style-name="T1"> </text:span><text:span text:style-name="T2">(49/9) </text:span> ⲛ̅ⲧⲙ̅ⲛ̅ⲧ’ⲁⲧ̅ⲛ̅ⲁⲣ[ⲏϫ̅ⲥ̅] ⲛ̣̅ⲧⲉ ⲡⲁ <text:line-break/><text:span text:style-name="T1"> </text:span><text:span text:style-name="T2">(49/10) </text:span> ϩⲟⲣⲁⲧⲟⲛ ⲙ̅ⲡⲛ̅[̅ⲁ̅ ⲉⲧⲕ]ⲏ̣ ⲛ̅ϩⲣⲁ̣[ⲓ̈] <text:line-break/><text:span text:style-name="T1"> </text:span><text:span text:style-name="T2">(49/11) </text:span> ⲛ̅ϩⲏⲧ̅ϥ̅ ⲉⲥⲕⲱⲧⲉ̣ ⲙ̣̅ⲙⲟϥ ⲉⲣ[ⲟϥ] <text:line-break/><text:span text:style-name="T1"> </text:span><text:span text:style-name="T2">(49/12) </text:span> [ϩ̅]̅ⲓ̣̅̅ⲛⲁ ϫⲉ ⲉⲥⲉⲉⲓⲙⲉ ϫⲉ ⲟⲩ ⲡⲉ <text:line-break/><text:span text:style-name="T1"> </text:span><text:span text:style-name="T2">(49/13) </text:span> [ⲡⲏ ⲉ]ⲧ̣ⲛ̣̅ϩⲣⲁⲓ̈ ⲛ̅ϩⲏⲧ̅ϥ̅· ⲁⲩⲱ ϫⲉ̣ <text:line-break/><text:span text:style-name="T1"> </text:span><text:span text:style-name="T2">(49/14) </text:span> [ⲉ]ϥ[ϣ]ⲟ̣ⲟⲡ ⲛ̅ⲁϣ ⲛ̅ϩⲉ· ⲁⲩⲱ ⲛ̣[ⲉ] <text:line-break/><text:span text:style-name="T1"> </text:span><text:span text:style-name="T2">(49/15) </text:span> [ⲣ]ⲉⲡⲁⲓ%9 ϣⲱⲡⲉ ⲛ̅ⲟⲩ̣ⲟ̣ⲩϫⲁⲓ̈ ⲛ̅ <text:line-break/><text:span text:style-name="T1"> </text:span><text:span text:style-name="T2">(49/16) </text:span> [ⲟ]ⲩⲟⲛ ⲛⲓⲙ· ⲉϥϣⲟⲟⲡ ⲛ̅ⲟⲩ <text:line-break/><text:span text:style-name="T1"> </text:span><text:span text:style-name="T2">(49/17) </text:span> ⲗ̣ⲁⲉⲓϭⲉ ⲛ̅ⲛⲓⲟⲛⲧⲱⲥ ⲉⲧ’ϣⲟ <text:line-break/><text:span text:style-name="T1"> </text:span><text:span text:style-name="T2">(49/18) </text:span> ⲟⲡ· ⲉⲃⲟⲗ ⲅⲁⲣ ϩ̅ⲓ̅ⲧ̅ⲙ̅ ⲡⲁⲓ̈ ⲁⲥϭⲱ <text:line-break/><text:span text:style-name="T1"> </text:span><text:span text:style-name="T2">(49/19) </text:span> ϣ̅ⲧ̅’̅ ⲉⲃⲟⲗ ⲛ̅ϭⲓ ⲧⲉϥⲅⲛⲱⲥⲓⲥ· <text:line-break/><text:span text:style-name="T1"> </text:span><text:span text:style-name="T2">(49/20) </text:span> ϫⲉ ⲛ̅ⲧⲟϥ ⲉⲧ’ⲥⲟⲟⲩⲛ ϫⲉ ⲟⲩ <text:line-break/><text:span text:style-name="T1"> </text:span><text:span text:style-name="T2">(49/21) </text:span> ⲡⲉ· ⲉⲙⲡⲉⲛⲁⲓ̈ ⲇⲉ ⲛ̅ ⲗⲁⲁⲩ ⲉⲃ[ⲟⲗ] <text:line-break/><text:span text:style-name="T1"> </text:span><text:span text:style-name="T2">(49/22) </text:span> [ⲛ̅ⲥ]ⲁ̣ⲛⲃⲟⲗ ⲛ̅ⲛⲉⲩⲉⲣⲏⲩ· ⲟⲩ[ⲧⲉ] <text:line-break/><text:span text:style-name="T1"> </text:span><text:span text:style-name="T2">(49/23) </text:span> ⲟ̣ⲩϭⲁⲙ· ⲟⲩⲧⲉ ⲟⲩⲧⲁⲝⲓⲥ· ⲟⲩ <text:line-break/><text:span text:style-name="T1"> </text:span><text:span text:style-name="T2">(49/24) </text:span> [ⲧ]ⲉ̣ ⲟⲩⲉⲁⲩ· ⲟⲩⲧⲉ ⲟⲩⲉⲱⲛ· <text:line-break/><text:span text:style-name="T1"> </text:span><text:span text:style-name="T2">(49/25) </text:span> [ⲛ̅]ⲧ̣ⲟⲟⲩ ⲅⲁⲣ ⲧⲏⲣⲟⲩ ϩⲉ̣ⲛϣⲁ <text:line-break/><text:span text:style-name="T1"> </text:span><text:span text:style-name="T2">(49/26) </text:span> [ⲉ]ⲛⲉϩ ⲛⲉ· ⲧⲙ̅ⲛ̅ⲧ’ⲱⲛ̅ϩ̣̅ ⲙ̅ⲛ̅ <text:line-break/><text:span text:style-name="T1"> </text:span><text:span text:style-name="T2">(49/27) </text:span> ⲧⲙ̅ⲛ̅ⲧ̅’̅ⲉⲓⲙⲉ· ⲙ̅ⲛ̅ ⲡⲉⲧ’ϣⲟ <text:line-break/><text:span text:style-name="T1"> </text:span><text:span text:style-name="T2">(49/28) </text:span> ⲟⲡ ⲛ̅ⲧⲟϥ ⲡⲉ· ⲧⲟⲧⲉ ⲅⲁⲣ ⲡⲏ <text:line-break/><text:span text:style-name="T1"> </text:span><text:span text:style-name="T2">(49/29) </text:span> ⲉⲧⲉ ⲡⲁⲓ̈ ⲡⲉ ⲟⲩⲛ̅ⲧⲁϥ ⲛ̅ⲧⲉϥ <text:line-break/><text:span text:style-name="T1"> </text:span><text:span text:style-name="T2">(49/30) </text:span> ⲙ̅ⲛ̅ⲧ’ⲱⲛ̅ϩ̅ ⲉϥⲙⲏⲛ· ⲙ̅ⲛ̅ ⲧⲛⲟ <text:line-break/><text:span text:style-name="T1"> </text:span><text:span text:style-name="T2">(49/31) </text:span> ⲏⲧⲏⲥ ⲁⲩⲱ {ⲡⲱⲛ̅ϩ̅· ⲉⲟⲩⲛ̅ <text:line-break/><text:span text:style-name="T1"> </text:span><text:span text:style-name="T2">(49/32) </text:span> ⲧⲉ} ⲧⲙ̅ⲛ̅ⲧ̅’̅ⲱⲛ̅ϩ̅ ⲟⲩⲛ̅ⲧⲉⲥ ⲛ̅ <text:line-break/><text:span text:style-name="T1"> </text:span><text:span text:style-name="T2">(49/33) </text:span> {ⲧⲙ̅ⲛ̅ⲧ̅’̅ⲁ}ⲧⲟⲩⲥⲓⲁ ⲙ̅ⲛ̅ ⲧⲙ̅ⲛⲧ’̅ <text:line-break/><text:span text:style-name="T1"> </text:span><text:span text:style-name="T2">(49/34) </text:span> ⲉⲓⲙⲉ· ϯⲛⲟⲏⲧⲏⲥ ⲉⲩⲛ̅ <text:line-break/><text:span text:style-name="T1"> </text:span><text:span text:style-name="T2">(49/35) </text:span> ⲧⲁⲥ ⲙ̅ⲡⲱⲛ̅ϩ̅ ⲙ̅ⲛ̅ ⲡⲉⲧ’ϣⲟ <text:line-break/><text:span text:style-name="T1"> </text:span><text:span text:style-name="T2">(49/36) </text:span> ⲟⲡ· ⲁⲩⲱ ⲡⲓϣⲟⲙ̅ⲧ̅’̅ ⲟⲩⲁ <text:line-break/><text:span text:style-name="T1"> </text:span><text:span text:style-name="T2">(49/37) </text:span> ⲛⲉ· ⲉⲩⲉ ⲛ̅ϣⲟⲙ̅ⲧ̅’̅ ⲕⲁⲧⲁ <text:line-break/><text:span text:style-name="T1"> </text:span><text:span text:style-name="T2">(49/38) </text:span> 2ʹ26 2ⲡⲟⲩⲁ ⲡⲟⲩⲁ· ⲁⲛⲟⲕ ⲇⲉ ⲛ̅ <text:line-break/><text:span text:style-name="T1"> </text:span><text:span text:style-name="T2">(49/39) </text:span> 2ʹ26 2ⲧⲁⲣⲓⲥⲱⲧ̅ⲙ̅ ⲉⲛⲁⲓ̈ ⲡⲁϣⲏⲣⲉ <text:line-break/><text:span text:style-name="T1"> </text:span><text:span text:style-name="T2">(50/1) </text:span> [ⲙⲉⲥⲥⲟⲥ ⲁⲉⲓⲣ̅]ϩⲟⲧⲉ ⲁⲩ̣ⲱ <text:line-break/><text:span text:style-name="T1"> </text:span><text:span text:style-name="T2">(50/2) </text:span> [ⲁⲉⲓⲕⲟⲧ̅’̅ⲧ̅’̅ ⲉⲡⲓⲟ]ⲩⲁⲧⲟ· ⲉ̣[ <text:line-break/><text:span text:style-name="T1"> </text:span><text:span text:style-name="T2">(50/3) </text:span> [ 10+- ⲙ]ⲉⲉ̣ⲩⲉ̣[ <text:line-break/><text:span text:style-name="T1"> </text:span><text:span text:style-name="T2">(50/4) </text:span> [ <text:line-break/><text:span text:style-name="T1"> </text:span><text:span text:style-name="T2">(50/5) </text:span> [...].[ <text:line-break/><text:span text:style-name="T1"> </text:span><text:span text:style-name="T2">(50/6) </text:span> [ϯ]ϭⲟⲙ ⲉ[ⲛⲏ ⲉⲧ’ϭ̅]̅ⲙ̣̅̅ϭⲟⲙ ⲛ̣̅ⲉⲓⲙⲉ <text:line-break/><text:span text:style-name="T1"> </text:span><text:span text:style-name="T2">(50/7) </text:span> [ⲉ]ⲛⲁⲓ̈ ⲉ[ⲃⲟⲗ ϩ̅ⲓ̅ⲧ]ⲛ̣̅ ⲟⲩⲱⲛ̅ϩ̅ ⲉ‐ <text:line-break/><text:span text:style-name="T1"> </text:span><text:span text:style-name="T2">(50/8) </text:span> ⲃⲟⲗ ⲉⲛ[ⲉⲁϥ ⲛ̅]ϩ̣ⲟⲩⲟ· ⲁⲛⲟⲕ ⲇⲉ <text:line-break/><text:span text:style-name="T1"> </text:span><text:span text:style-name="T2">(50/9) </text:span> ⲁⲉⲓϭ̅ⲙ̅ϭ̣[ⲟⲙ ]ⲉ̣ⲩⲛ̅ ⲟⲩⲥⲁⲣ̅ⲝ̅ ⲧⲟ <text:line-break/><text:span text:style-name="T1"> </text:span><text:span text:style-name="T2">(50/10) </text:span> ϩ̣̅̅ⲓ̅ⲱⲱ̣[ⲧ’ ⲁⲉⲓ]ⲥ̣ⲱⲧ̅ⲙ̅ ⲉⲛⲁⲓ̈ ⲉⲃⲟⲗ <text:line-break/><text:span text:style-name="T1"> </text:span><text:span text:style-name="T2">(50/11) </text:span> ⲛ̅ⲧⲟⲟⲧⲕ̣̅ [ⲁ]ⲩⲱ ⲉⲧⲃⲉ ϯⲥⲃⲱ <text:line-break/><text:span text:style-name="T1"> </text:span><text:span text:style-name="T2">(50/12) </text:span> ⲉⲧ̅ⲛ̅ϩⲏⲧⲟⲩ· ⲉⲁⲡⲓⲙⲉⲉⲩⲉ̣ <text:line-break/><text:span text:style-name="T1"> </text:span><text:span text:style-name="T2">(50/13) </text:span> ⲉⲧ̅ⲛ̅ϩⲏⲧ’ ⲁϥⲡⲱⲣ̅ϫ̅ ⲛ̅ⲛ̣[ⲏ] ⲉ̣ⲧ’̣ <text:line-break/><text:soft-page-break/><text:span text:style-name="T1"> </text:span><text:span text:style-name="T2">(50/14) </text:span> ϫ̣ⲟⲥⲉ ⲉ[ⲡ]ϣⲓ ⲙ̅ⲛ̅ ⲛⲓⲁⲧ’[ⲥ]ⲟⲩ[ⲱ] <text:line-break/><text:span text:style-name="T1"> </text:span><text:span text:style-name="T2">(50/15) </text:span> ⲛⲟⲩ· ⲉⲧ̣ⲃⲉ ⲡⲁⲓ̈ ϯⲣ̅ϩⲟⲧⲉ ⲙ[ⲏ] <text:line-break/><text:span text:style-name="T1"> </text:span><text:span text:style-name="T2">(50/16) </text:span> ⲡⲱⲥ ⲁⲧⲁⲥⲃⲱ ⲁⲥⲉⲓⲣⲉ ⲛ̅ⲟⲩ <text:line-break/><text:span text:style-name="T1"> </text:span><text:span text:style-name="T2">(50/17) </text:span> ⲗⲁⲁⲩ ⲡⲁⲣⲁ ⲡⲉⲧⲉϣϣⲉ· ⲁⲩⲱ̣ <text:line-break/><text:span text:style-name="T1"> </text:span><text:span text:style-name="T2">(50/18) </text:span> ⲧⲟⲧⲉ ⲡⲉϫⲁⲥ ⲛⲁⲓ̈ ⲟⲛ {ϫⲉ}ⲡⲁ <text:line-break/><text:span text:style-name="T1"> </text:span><text:span text:style-name="T2">(50/19) </text:span> ϣⲏⲣⲉ ⲙⲉⲥⲥⲟⲥ ⲛ̅ϭⲓ ⲧⲁⲛⲓⲉ <text:line-break/><text:span text:style-name="T1"> </text:span><text:span text:style-name="T2">(50/20) </text:span> [ⲟ]ⲟⲩ ⲧⲏⲣⲟⲩ ⲓ̈ⲟ̅ⲩ̅ⲏ̅ⲗ̅· ⲁⲥϭ̣ⲱ̣ⲗ̣̅[ⲡ̅] <text:line-break/><text:span text:style-name="T1"> </text:span><text:span text:style-name="T2">(50/21) </text:span> [ⲛ]ⲁⲓ̈ ⲉⲃⲟⲗ· ⲁⲩⲱ ⲡⲉϫⲁⲥ ϫⲉ ⲙ[ⲉ] <text:line-break/><text:span text:style-name="T1"> </text:span><text:span text:style-name="T2">(50/22) </text:span> ⲣⲉϣⲟⲩⲟⲛ ⲛⲓⲙ ⲥⲱⲧ̅ⲙ̅ ⲉⲛⲁ̣[ⲓ̈] <text:line-break/><text:span text:style-name="T1"> </text:span><text:span text:style-name="T2">(50/23) </text:span> ⲉⲃⲟⲗ̣ ⲉⲛⲓⲛⲟϭ ⲛ̅ϭⲟⲙ ⲟⲩⲁ[ⲁⲩ] <text:line-break/><text:span text:style-name="T1"> </text:span><text:span text:style-name="T2">(50/24) </text:span> ⲱ̅ ⲡⲁⲗⲗⲟⲅⲉⲛⲏⲥ ⲁⲩϯ ϩ̅ⲓ̅ⲱ <text:line-break/><text:span text:style-name="T1"> </text:span><text:span text:style-name="T2">(50/25) </text:span> ⲱⲕ ⲛ̅ⲟⲩⲛⲟϭ ⲛ̅ϭⲟⲙ· ⲧⲏ ⲉ <text:line-break/><text:span text:style-name="T1"> </text:span><text:span text:style-name="T2">(50/26) </text:span> ⲧⲁϥⲧⲁⲁⲥ ϩ̅ⲓ̅ⲱⲱⲕ ⲛ̅ϭⲓ ⲡⲓⲱⲧ’ <text:line-break/><text:span text:style-name="T1"> </text:span><text:span text:style-name="T2">(50/27) </text:span> ⲛ̅ⲧⲉ ⲡⲧⲏⲣ̅ϥ̅ ⲡⲓϣⲁ ⲉⲛⲉϩ ϩⲁ <text:line-break/><text:span text:style-name="T1"> </text:span><text:span text:style-name="T2">(50/28) </text:span> ⲑⲏ ⲉⲙⲡⲁⲧⲉⲕⲉ̅ⲓ̅ ⲉⲡⲓⲙⲁ· ϩ̅ⲓ̅ <text:line-break/><text:span text:style-name="T1"> </text:span><text:span text:style-name="T2">(50/29) </text:span> ⲛⲁ ⲛⲏ ⲉⲧ’ⲙⲟⲕ̅ϩ̅ ⲙ̅ⲡⲟⲣϫⲟⲩ <text:line-break/><text:span text:style-name="T1"> </text:span><text:span text:style-name="T2">(50/30) </text:span> ϫⲉ ⲉⲕⲉⲡⲟⲣϫⲟⲩ· ⲁⲩⲱ ⲛⲏ <text:line-break/><text:span text:style-name="T1"> </text:span><text:span text:style-name="T2">(50/31) </text:span> ⲉⲧⲉ ⲛ̅ⲛⲁⲧ’ⲥⲟⲩⲱⲛⲟⲩ ⲙ̅ <text:line-break/><text:span text:style-name="T1"> </text:span><text:span text:style-name="T2">(50/32) </text:span> ⲡⲓⲟⲩⲁⲧⲟ ϫⲉ ⲉⲕⲉⲉⲓⲙⲉ ⲉ <text:line-break/><text:span text:style-name="T1"> </text:span><text:span text:style-name="T2">(50/33) </text:span> ⲣⲟⲟⲩ· ⲁⲩⲱ ⲛ̅ⲅ̅ⲛⲟⲩϩ̅ⲙ̅ ⲉ <text:line-break/><text:span text:style-name="T1"> </text:span><text:span text:style-name="T2">(50/34) </text:span> ϩⲣⲁⲓ̈ ⲉⲡⲉⲧⲉ ⲡⲱⲕ· ⲡⲏ ⲉ <text:line-break/><text:span text:style-name="T1"> </text:span><text:span text:style-name="T2">(50/35) </text:span> ⲧⲁϥⲣ̅ϣⲟⲣ̅ⲡ̅ ⲛ̅ⲛⲟⲩϩ̅ⲙ̅ ⲙ̅ⲛ̅ <text:line-break/><text:span text:style-name="T1"> </text:span><text:span text:style-name="T2">(50/36) </text:span> ⲡⲏ ⲉⲧⲉ ⲙⲁϥⲣ̅ⲭⲣⲓⲁ ⲛ̅ⲛⲁϩⲙⲉϥ <text:line-break/><text:span text:style-name="T1"> </text:span><text:span text:style-name="T2">(51/5) </text:span> (Lines 1--5 lacking) <text:line-break/><text:span text:style-name="T1"> </text:span><text:span text:style-name="T2">(51/6) </text:span> ϩ̣ⲏ[...].[.....ⲛ]ⲁ̣ⲕ [ⲟⲩ] <text:line-break/><text:span text:style-name="T1"> </text:span><text:span text:style-name="T2">(51/7) </text:span> ⲉⲓⲇⲟⲥ ⲙ[ⲛ̅ ⲟⲩⲱⲛ̅]ϩ̣ ⲉⲃⲟⲗ [ⲙ̅] <text:line-break/><text:span text:style-name="T1"> </text:span><text:span text:style-name="T2">(51/8) </text:span> ⲡⲓϣⲟⲙ̅ⲧ̅’̅ [ⲛ̅ϭⲟⲙ ⲛ̅]ⲛ̣ⲁⲧⲛⲁⲩ <text:line-break/><text:span text:style-name="T1"> </text:span><text:span text:style-name="T2">(51/9) </text:span> ⲉⲣⲟϥ ⲙ̅ⲡⲛ̅ⲁ̣̅̅ ⲉ[ⲥⲕⲏ ⲛ̅]ⲥⲁⲃⲟⲗ ⲙ̣̅ <text:line-break/><text:span text:style-name="T1"> </text:span><text:span text:style-name="T2">(51/10) </text:span> ⲙⲟϥ ⲛ̅ϭⲓ ⲟⲩⲅⲛⲱ̣[ⲥⲓⲥ ̅̅ⲛ̅]̅ⲁⲧ’ⲡ̣[ⲱ] <text:line-break/><text:span text:style-name="T1"> </text:span><text:span text:style-name="T2">(51/11) </text:span> ϣⲉ ⲛ̅ⲁⲧ’ⲥⲱⲙⲁ [ⲛ̅]ϣ̣[ⲁ ⲉ]ⲛⲉϩ <text:line-break/><text:span text:style-name="T1"> </text:span><text:span text:style-name="T2">(51/12) </text:span> ⲕⲁⲧⲁ ⲑⲉ ⲉⲧ’ϩ̅ⲛ̅ ⲛ[ⲓ]ⲉⲱⲛ ⲧⲏⲣ[ⲟⲩ] <text:line-break/><text:span text:style-name="T1"> </text:span><text:span text:style-name="T2">(51/13) </text:span> [ⲉ]ϥ̣ϣⲟⲟⲡ ⲛ̅ϭⲓ ⲡⲓⲉⲱⲛ ⲛ̅ⲃⲁⲣⲃ[ⲏ] <text:line-break/><text:span text:style-name="T1"> </text:span><text:span text:style-name="T2">(51/14) </text:span> [ⲗ]ⲱ· ⲉⲩⲛ̅ⲧⲁϥ ⲟⲛ ⲛ̅ⲛⲓⲧⲩⲡⲟⲥ <text:line-break/><text:span text:style-name="T1"> </text:span><text:span text:style-name="T2">(51/15) </text:span> ⲙ̅ⲛ̅ ⲛⲓⲉⲓⲇⲟⲥ ⲛ̅ⲧⲉ ⲛⲓⲟⲛⲧⲱⲥ <text:line-break/><text:span text:style-name="T1"> </text:span><text:span text:style-name="T2">(51/16) </text:span> ⲉⲧ’ϣⲟⲟⲡ· ϯϩ̅ⲓ̅ⲕⲱⲛ ⲛ̅ⲧⲉ <text:line-break/><text:span text:style-name="T1"> </text:span><text:span text:style-name="T2">(51/17) </text:span> ⲡⲓⲕⲁⲗⲩⲡⲧⲟⲥ· ⲉⲩⲛ̅ⲧⲁϥ ⲇⲉ <text:line-break/><text:span text:style-name="T1"> </text:span><text:span text:style-name="T2">(51/18) </text:span> ⲙ̅ⲡⲓϣⲁϫⲉ ⲛ̅ⲛⲟⲉⲣⲟⲛ ⲛ̅ⲧⲉ <text:line-break/><text:span text:style-name="T1"> </text:span><text:span text:style-name="T2">(51/19) </text:span> ⲛⲁⲓ̈ ⲉϥⲧⲱⲛ ϩⲁ ⲡⲓⲡⲣⲱⲧⲟⲫⲁ <text:line-break/><text:span text:style-name="T1"> </text:span><text:span text:style-name="T2">(51/20) </text:span> ⲛⲏⲥ ⲛ̅ϩⲟⲟⲩⲧ’ ⲛ̅ⲛⲟⲩⲥ ⲕⲁⲧⲁ <text:line-break/><text:span text:style-name="T1"> </text:span><text:span text:style-name="T2">(51/21) </text:span> ⲟⲩϩ̅ⲓ̅ⲕⲱⲛ· ⲉϥⲣ̅ⲉⲛⲉⲣⲅⲓ ⲇⲉ <text:line-break/><text:span text:style-name="T1"> </text:span><text:span text:style-name="T2">(51/22) </text:span> ϩ̅ⲛ̅ ⲛ̣ⲓⲕⲁⲧⲁ ⲟⲩⲁ· ⲉⲓⲧⲉ ϩ̅ⲛ̅ ⲟⲩ <text:line-break/><text:span text:style-name="T1"> </text:span><text:span text:style-name="T2">(51/23) </text:span> ⲧⲉⲭⲛⲏ· ⲉⲓⲧⲉ ϩ̅ⲛ̅ ⲟⲩⲉⲡⲓⲥⲧⲏ̣ <text:line-break/><text:span text:style-name="T1"> </text:span><text:span text:style-name="T2">(51/24) </text:span> [ⲙ]ⲏ· ⲉⲓⲧⲉ ϩ̅ⲛ̅ ⲟⲩⲫⲩⲥⲓⲥ ⲙ̅ <text:line-break/><text:span text:style-name="T1"> </text:span><text:span text:style-name="T2">(51/25) </text:span> ⲙⲉⲣⲓⲕⲟⲛ· ⲉⲩⲛ̅ⲧⲁϥ ⲙ̅ⲡⲓ <text:line-break/><text:span text:style-name="T1"> </text:span><text:span text:style-name="T2">(51/26) </text:span> ⲁⲩⲧⲟⲅⲉⲛⲏⲥ ⲛ̅ⲛⲟⲩⲧⲉ ⲕⲁ <text:line-break/><text:span text:style-name="T1"> </text:span><text:span text:style-name="T2">(51/27) </text:span> ⲧⲁ ⲟⲩϩ̅ⲓ̅ⲕⲱⲛ· ⲉϥⲉⲓⲙⲉ ⲇⲉ <text:line-break/><text:span text:style-name="T1"> </text:span><text:span text:style-name="T2">(51/28) </text:span> ⲉⲡⲟⲩⲁ ⲡⲟⲩⲁ ⲛ̅ⲧⲉ ⲛⲁⲓ̈· ⲉϥ <text:line-break/><text:soft-page-break/><text:span text:style-name="T1"> </text:span><text:span text:style-name="T2">(51/29) </text:span> ⲣ̅ⲉⲛⲉⲣⲅⲉⲓ ⲕⲁⲧⲁ ⲙⲉⲣⲟⲥ ⲁⲩⲱ <text:line-break/><text:span text:style-name="T1"> </text:span><text:span text:style-name="T2">(51/30) </text:span> ⲕⲁⲧⲁ ⲟⲩⲁ ⲉϥⲟⲩⲏϩ ⲉϥⲧⲁϩⲟ <text:line-break/><text:span text:style-name="T1"> </text:span><text:span text:style-name="T2">(51/31) </text:span> ⲛ̅ⲛⲓⲛⲟⲃⲉ ⲉⲣⲁⲧⲟⲩ ⲛⲓⲉⲃⲟⲗ <text:line-break/><text:span text:style-name="T1"> </text:span><text:span text:style-name="T2">(51/32) </text:span> ϩ̅ⲛ̅ ϯⲫⲩⲥⲓⲥ· ⲟⲩⲛ̅ⲧⲁϥ ⲙ̅ <text:line-break/><text:span text:style-name="T1"> </text:span><text:span text:style-name="T2">(51/33) </text:span> ⲡⲓϣⲟⲙ̅ⲧ̅’̅ ⲛ̅ϩⲟⲟⲩⲧ’ ⲛ̅ⲛⲟⲩ <text:line-break/><text:span text:style-name="T1"> </text:span><text:span text:style-name="T2">(51/34) </text:span> ⲧⲉ ⲉⲩⲟⲩϫⲁⲓ̈ ⲛ̅ⲧⲉⲩ ⲧⲏ <text:line-break/><text:span text:style-name="T1"> </text:span><text:span text:style-name="T2">(51/35) </text:span> ⲣⲟⲩ ⲙ̅ⲛ̅ ⲡⲓⲁϩⲟⲣⲁⲧⲟⲛ ⲙ̅ⲡ̅ⲛⲁ̅ <text:line-break/><text:span text:style-name="T1"> </text:span><text:span text:style-name="T2">(51/36) </text:span> ⲟⲩϣⲁϫⲉ ⲡⲉ ⲉⲃⲟⲗ ϩ̅ⲛ̅ ⲟⲩϣⲟ <text:line-break/><text:span text:style-name="T1"> </text:span><text:span text:style-name="T2">(51/37) </text:span> ϫⲛⲉ 〈ⲛ̅ⲧⲟϥ〉 ⲡⲉ ⲡⲓⲁⲗⲟⲩ ⲛ̅ⲧⲉⲗⲓⲟⲥ <text:line-break/><text:span text:style-name="T1"> </text:span><text:span text:style-name="T2">(51/38) </text:span> ⲁⲩⲱ ⲧⲉⲓ̈ϩⲩⲡⲟⲥⲧⲁⲥⲓⲥ ⲟⲩⲁ <text:line-break/><text:span text:style-name="T1"> </text:span><text:span text:style-name="T2">(52/5) </text:span> (Lines 1--5 lacking) <text:line-break/><text:span text:style-name="T1"> </text:span><text:span text:style-name="T2">(52/6) </text:span> [...].[ 10+- ]ⲁ̣[ⲥ] <text:line-break/><text:span text:style-name="T1"> </text:span><text:span text:style-name="T2">(52/7) </text:span> [ⲣ̣ϭ]ⲁⲃϩⲏ[ⲧ ⲛ‐ϭⲓ ⲧⲁⲯⲩ]ⲭ̣ⲏ̣· ⲁⲩⲱ <text:line-break/><text:span text:style-name="T1"> </text:span><text:span text:style-name="T2">(52/8) </text:span> [ⲁ]ⲉⲓⲣ̅ ⲉⲃ[ⲟⲗ ⲁⲉⲓϣⲧ]ⲟ̣ⲣⲧ̅ⲣ̅ ⲉⲙⲁ <text:line-break/><text:span text:style-name="T1"> </text:span><text:span text:style-name="T2">(52/9) </text:span> ⲧⲉ· ⲁⲩ̣[ⲱ ⲁⲉ]ⲓ̣ⲕⲟ̣ⲧ’ⲧ̅’ ⲉⲣⲟⲉⲓ <text:line-break/><text:span text:style-name="T1"> </text:span><text:span text:style-name="T2">(52/10) </text:span> ⲟⲩⲁ[ⲁⲧ’ ⲁ]ⲉⲓⲛⲁⲩ ⲉⲡⲓⲟⲩⲟ <text:line-break/><text:span text:style-name="T1"> </text:span><text:span text:style-name="T2">(52/11) </text:span> ⲉⲓⲛ ⲉ̣[ⲧ’ⲕⲱ]ⲧⲉ ⲉⲣⲟⲉⲓ ⲙ̅ⲛ̅ ⲡⲓ <text:line-break/><text:span text:style-name="T1"> </text:span><text:span text:style-name="T2">(52/12) </text:span> ⲁⲅⲁⲑⲟⲛ ⲉ̣ⲧ̅ⲛ̅ϩⲏⲧ’ ⲁⲉⲓⲣ̅ⲛⲟⲩ̣ <text:line-break/><text:span text:style-name="T1"> </text:span><text:span text:style-name="T2">(52/13) </text:span> ⲧⲉ· ⲁⲩⲱ ⲁⲥϫⲱϩ ⲉⲣⲟⲓ̈ ⲟⲛ ⲛ̣̅[ϭⲓ] <text:line-break/><text:span text:style-name="T1"> </text:span><text:span text:style-name="T2">(52/14) </text:span> ⲧⲁⲛⲓⲉⲟⲟⲩ ⲧⲏⲣⲟⲩ ⲓ̈ⲟ̅ⲩ̅ⲏ̅ⲗ̣̅̅ <text:line-break/><text:span text:style-name="T1"> </text:span><text:span text:style-name="T2">(52/15) </text:span> ⲁⲥϯ ϭⲟⲙ ⲛⲁⲓ̈· ⲡⲉϫⲁⲥ ϫⲉ ⲉ <text:line-break/><text:span text:style-name="T1"> </text:span><text:span text:style-name="T2">(52/16) </text:span> ⲡⲓⲇⲏ ⲁⲧⲉⲕⲥⲃⲱ ⲁⲥⲣ̅ⲧⲉⲗⲓⲟⲥ <text:line-break/><text:span text:style-name="T1"> </text:span><text:span text:style-name="T2">(52/17) </text:span> ⲙ̅ⲛ̅ ⲡⲓⲁⲅⲁⲑⲟⲛ ⲉⲧ̅ⲛ̅ϩⲏⲧ̅ⲕ̅ <text:line-break/><text:span text:style-name="T1"> </text:span><text:span text:style-name="T2">(52/18) </text:span> ⲁⲕⲉⲓⲙⲉ ⲉⲣⲟϥ· ⲥⲱⲧ̅ⲙ̅ ⲉⲧⲃⲉ <text:line-break/><text:span text:style-name="T1"> </text:span><text:span text:style-name="T2">(52/19) </text:span> ⲡⲓϣⲙ̅ⲛ̅ⲧ’ϭⲟⲙ· ⲛⲏ ⲉⲧⲉ ⲕⲛⲁ <text:line-break/><text:span text:style-name="T1"> </text:span><text:span text:style-name="T2">(52/20) </text:span> [ϩ]ⲁ̣ⲣⲉϩ ⲉⲣⲟⲟⲩ ϩ̅ⲛ̅ ⲟⲩⲛⲟϭ ⲛ̅ <text:line-break/><text:span text:style-name="T1"> </text:span><text:span text:style-name="T2">(52/21) </text:span> ⲥⲓⲅⲏ ⲙ̅ⲛ̅ ⲟⲩⲛⲟϭ ⲙ̅ⲙⲩⲥⲧⲏⲣ̣[ⲓ] <text:line-break/><text:span text:style-name="T1"> </text:span><text:span text:style-name="T2">(52/22) </text:span> ⲟⲛ ϫⲉ ⲛⲁⲓ̈ ⲙⲉⲩϫⲟⲟⲩ ⲛ̅ⲟⲩ <text:line-break/><text:span text:style-name="T1"> </text:span><text:span text:style-name="T2">(52/23) </text:span> ⲟⲛ ⲛⲓⲙ ⲉⲃⲟⲗ ⲉⲛⲏ ⲉⲧ̅ⲙ̅ⲡϣⲁ <text:line-break/><text:span text:style-name="T1"> </text:span><text:span text:style-name="T2">(52/24) </text:span> ⲛⲏ ⲉⲧⲉ ⲟⲩⲛ̅ϭⲟⲙ ⲙ̅ⲙⲟⲟⲩ <text:line-break/><text:span text:style-name="T1"> </text:span><text:span text:style-name="T2">(52/25) </text:span> ⲉⲥⲱⲧ̅ⲙ̅· ⲟⲩⲧⲉ ⲙ̅ⲡⲉⲧⲉϣ <text:line-break/><text:span text:style-name="T1"> </text:span><text:span text:style-name="T2">(52/26) </text:span> ϣⲉ ⲁⲛ ⲡⲉ ⲉϫⲟⲟⲩ ⲉϩⲣⲁⲓ̈ ⲉⲩ <text:line-break/><text:span text:style-name="T1"> </text:span><text:span text:style-name="T2">(52/27) </text:span> ⲅⲉⲛⲉⲁ ⲛ̅ⲛⲁⲧⲥⲃⲱ ⲉⲧⲃⲉ ⲡⲓ <text:line-break/><text:span text:style-name="T1"> </text:span><text:span text:style-name="T2">(52/28) </text:span> ⲧⲏⲣ̅ϥ̅ ⲉⲧ’ϫⲟⲥⲉ ⲉⲧⲉⲗⲓⲟⲥ· <text:line-break/><text:span text:style-name="T1"> </text:span><text:span text:style-name="T2">(52/29) </text:span> ⲟⲩⲛ̅ⲧⲁⲕ ⲇⲉ ⲙ̅ⲙⲁⲩ 〈ⲛ̅ⲛⲁⲓ̈〉 ⲉⲧⲃⲉ <text:line-break/><text:span text:style-name="T1"> </text:span><text:span text:style-name="T2">(52/30) </text:span> ⲡⲓϣⲟⲙ̅ⲧ̅’̅ ⲛ̅ϭⲟⲙ· ⲡⲏ ⲉⲧ’ϣⲟ <text:line-break/><text:span text:style-name="T1"> </text:span><text:span text:style-name="T2">(52/31) </text:span> ⲟⲡ ϩ̅ⲛ̅ ⲟⲩⲙ̅ⲛⲧ’̅ⲙⲁⲕⲁⲣⲓⲟⲥ <text:line-break/><text:span text:style-name="T1"> </text:span><text:span text:style-name="T2">(52/32) </text:span> ⲙ̅ⲛ̅ ⲟⲩⲙ̅ⲛⲧ’̅ⲁⲅⲁⲑⲟⲥ· ⲡⲏ <text:line-break/><text:span text:style-name="T1"> </text:span><text:span text:style-name="T2">(52/33) </text:span> ⲉⲧⲉ ⲛ̅ⲗⲟⲉⲓϭⲉ ⲉⲛⲁⲓ̈ ⲧⲏⲣⲟⲩ· <text:line-break/><text:span text:style-name="T1"> </text:span><text:span text:style-name="T2">(52/34) </text:span> ⲉⲥϣⲟⲟⲡ ϩⲣⲁⲓ̈ ⲛ̅ϩⲏⲧ̅ϥ̅ ⲛ̅ϭⲓ <text:line-break/><text:span text:style-name="T1"> </text:span><text:span text:style-name="T2">(52/35) </text:span> ⲟⲩⲙ̅ⲛ̅ⲧⲛⲟϭ ⲉⲛⲁϣⲱⲥ <text:line-break/><text:span text:style-name="T1"> </text:span><text:span text:style-name="T2">(52/36) </text:span> ⲉϥϣⲟⲟⲡ ⲉⲟⲩⲁ ⲡⲉ ϩ̅ⲛ̅ ⲟⲩ <text:line-break/><text:span text:style-name="T1"> </text:span><text:span text:style-name="T2">(53/4) </text:span> (Lines 1--4 lacking) <text:line-break/><text:span text:style-name="T1"> </text:span><text:span text:style-name="T2">(53/5) </text:span> ϣⲟ̣[ <text:line-break/><text:span text:style-name="T1"> </text:span><text:span text:style-name="T2">(53/6) </text:span> ⲛ̅ⲧⲉ ϯϣ[ⲟⲣ̅ⲡ̅ ⲛ̅ⲉⲛⲛⲟⲓⲁ ⲡⲏ ⲉ] <text:line-break/><text:span text:style-name="T1"> </text:span><text:span text:style-name="T2">(53/7) </text:span> ⲑⲉ ⲁⲛ ⲉⲃ[ⲟⲗ ϩ̅ⲛ̅ ⲛⲏ ⲉⲧ’ϣⲟⲟⲡ] <text:line-break/><text:span text:style-name="T1"> </text:span><text:span text:style-name="T2">(53/8) </text:span> ϩⲣⲁⲓ̈ ϩ̅ⲛ̅ ⲟⲩⲧⲁϩⲟ̣ [ⲙ̅ⲛ̅ ⲟⲩⲅⲛⲱ] <text:line-break/><text:soft-page-break/><text:span text:style-name="T1"> </text:span><text:span text:style-name="T2">(53/9) </text:span> ⲥⲓⲥ ⲙ̅ⲛ̅ ⲟⲩⲉⲡⲓ̣[ⲥⲧⲏ]ⲙ̣[ⲏ] [ⲁⲩⲱ] <text:line-break/><text:span text:style-name="T1"> </text:span><text:span text:style-name="T2">(53/10) </text:span> ⲁϥⲕⲓⲙ ϩ̅ⲛ̅ ⲟⲩⲙ̅[ⲛ]ⲧ’̣̅ⲁⲧ’ⲕⲓ̣ⲙ̣ <text:line-break/><text:span text:style-name="T1"> </text:span><text:span text:style-name="T2">(53/11) </text:span> [ⲛ̅]ϭ̣ⲓ ⲡⲏ ⲉⲧ̅ⲙ̅ⲙⲁⲩ̣ ϩⲣⲁⲓ̈ ϩ̅ⲙ̅ ⲡⲉⲧ’̣ <text:line-break/><text:span text:style-name="T1"> </text:span><text:span text:style-name="T2">(53/12) </text:span> [ⲣ̅]ϩ̣̅̅ⲙ̅ⲙⲉ· ϩ̅ⲓ̅ⲛⲁ ϫⲉ ⲛⲉϥⲱⲙⲉⲥ <text:line-break/><text:span text:style-name="T1"> </text:span><text:span text:style-name="T2">(53/13) </text:span> ⲉ̣ϩⲟⲩⲛ ⲉⲡⲓⲁⲧ̅ⲛ̅ⲁⲣⲏϫ̅ϥ̅ ⲉⲃⲟⲗ <text:line-break/><text:span text:style-name="T1"> </text:span><text:span text:style-name="T2">(53/14) </text:span> ϩ̅ⲓ̅ⲧⲟⲟⲧ̅ⲥ̅ ⲛ̅ⲕⲉⲉⲛⲉⲣⲅⲓⲁ ⲛ̅ⲧⲉ <text:line-break/><text:span text:style-name="T1"> </text:span><text:span text:style-name="T2">(53/15) </text:span> ϯⲙ̅ⲛ̅ⲧ̅’̅ⲉⲓⲙⲉ· ⲁⲩⲱ ⲁϥⲃⲱⲕ <text:line-break/><text:span text:style-name="T1"> </text:span><text:span text:style-name="T2">(53/16) </text:span> ⲉϩⲟⲩⲛ ⲉⲣⲟϥ ⲟⲩⲁⲁϥ· ⲁϥⲟⲩ <text:line-break/><text:span text:style-name="T1"> </text:span><text:span text:style-name="T2">(53/17) </text:span> ⲱⲛ̅ϩ̅ ⲉⲃⲟⲗ ⲉϥⲉ ⲛ̅ϯ ⲧⲟϣ ⲛⲓⲙ· <text:line-break/><text:span text:style-name="T1"> </text:span><text:span text:style-name="T2">(53/18) </text:span> ⲡⲓⲧⲏⲣ̅ϥ̅ ⲉⲧ’ϫⲟⲥⲉ ⲉⲧⲉⲗⲓⲟⲥ· <text:line-break/><text:span text:style-name="T1"> </text:span><text:span text:style-name="T2">(53/19) </text:span> ⲉϥⲉ ⲛ̅ϣⲟⲣ̅ⲡ̅ ⲙⲉⲛ ⲉϯⲅⲛⲱ <text:line-break/><text:span text:style-name="T1"> </text:span><text:span text:style-name="T2">(53/20) </text:span> ⲥⲓⲥ ⲛ̅ϯϩⲉ ⲉⲃⲟⲗ ϩ̅ⲓ̅ⲧⲟⲟⲧ’ ⲁⲛ <text:line-break/><text:span text:style-name="T1"> </text:span><text:span text:style-name="T2">(53/21) </text:span> ⲉⲡⲓⲇⲏ ⲙ̅ⲙ̅ⲛ̅ϭⲟⲙ ⲉⲡⲓⲧⲉϩⲟ̣ <text:line-break/><text:span text:style-name="T1"> </text:span><text:span text:style-name="T2">(53/22) </text:span> ⲛ̣̅ⲧⲉⲗⲓⲟⲥ ⲉⲩⲉⲓⲙⲉ ⲉⲣⲟϥ ⲛ̅ <text:line-break/><text:span text:style-name="T1"> </text:span><text:span text:style-name="T2">(53/23) </text:span> ϯϩⲉ ⲇⲉ ⲡⲁⲓ̈· ⲉⲧⲃⲉ ⲡⲓⲙⲉϩ <text:line-break/><text:span text:style-name="T1"> </text:span><text:span text:style-name="T2">(53/24) </text:span> ϣⲟⲙ̅ⲧ̅’̅ ⲛ̅ⲕⲁⲣⲱϥ ⲛ̅ⲧⲉ ϯⲙ̅ⲛⲧ’̅ <text:line-break/><text:span text:style-name="T1"> </text:span><text:span text:style-name="T2">(53/25) </text:span> ⲉⲓⲙⲉ· ⲙ̅ⲛ̅ ϯⲙⲉϩⲥ̅ⲛ̅ⲧⲉ ⲛ̅ⲉ <text:line-break/><text:span text:style-name="T1"> </text:span><text:span text:style-name="T2">(53/26) </text:span> ⲛⲉⲣⲅⲓⲁ ⲛ̅ⲁⲧ’ⲡⲱⲣ̅ϫ̅ ⲉⲧⲁⲥⲟⲩ <text:line-break/><text:span text:style-name="T1"> </text:span><text:span text:style-name="T2">(53/27) </text:span> ⲱⲛ̅ϩ̅ ⲉⲃⲟⲗ ϩ̅ⲛ̅ ϯϣⲟⲣ̅ⲡ̅ ⲛ̅ⲉⲛ <text:line-break/><text:span text:style-name="T1"> </text:span><text:span text:style-name="T2">(53/28) </text:span> ⲛⲟⲓⲁ ⲉⲧⲉ ⲡⲓⲉⲱⲛ ⲡⲉ ⲛ̅ⲃⲁⲣ <text:line-break/><text:span text:style-name="T1"> </text:span><text:span text:style-name="T2">(53/29) </text:span> ⲃⲏⲗⲱ· ⲙ̅ⲛ̣̅̅ ⲡⲓⲁⲧ’ⲡⲱϣ ⲛ̅ <text:line-break/><text:span text:style-name="T1"> </text:span><text:span text:style-name="T2">(53/30) </text:span> ⲛⲓⲛⲉ ⲙ̅ⲡⲱϣ· ⲙ̅ⲛ̅ ⲡⲓϣⲙ̅ⲛⲧ’̅ <text:line-break/><text:span text:style-name="T1"> </text:span><text:span text:style-name="T2">(53/31) </text:span> ϭⲟⲙ· ⲙ̅ⲛ̅ ϯϩⲩⲡⲁⲣⲝⲓⲥ ⲛ̅ⲛⲁ <text:line-break/><text:span text:style-name="T1"> </text:span><text:span text:style-name="T2">(53/32) </text:span> ⲧⲟⲩⲥⲓⲁ〈·〉 〈ⲁⲩⲱ〉 ϯϭⲟⲙ{·} ⲁⲥⲟⲩ <text:line-break/><text:span text:style-name="T1"> </text:span><text:span text:style-name="T2">(53/33) </text:span> ⲱⲛ̅ϩ̅ ⲉⲃⲟⲗ̓ ⲉⲃⲟⲗ ϩ̅ⲓ̅ⲧ̅ⲛ̅ ⲟⲩⲉ <text:line-break/><text:span text:style-name="T1"> </text:span><text:span text:style-name="T2">(53/34) </text:span> ⲛⲉⲣⲅⲓⲁ ⲉⲥϩⲟⲣ̅ⲕ̅ ⲙ̅ⲙⲟⲥ <text:line-break/><text:span text:style-name="T1"> </text:span><text:span text:style-name="T2">(53/35) </text:span> ⲁⲩⲱ ⲉⲥⲕⲱ ⲛ̅ⲣⲱⲥ ⲉⲁⲥϯ <text:line-break/><text:span text:style-name="T1"> </text:span><text:span text:style-name="T2">(53/36) </text:span> ⲛ̅ⲟⲩϩⲣⲟⲟⲩ ⲛ̅ϯϩⲉ ϫⲉ ⲍⲍⲁ <text:line-break/><text:span text:style-name="T1"> </text:span><text:span text:style-name="T2">(53/37) </text:span> ⲍⲍⲁ ⲍⲍⲁ· ⲛ̅ⲧⲉⲣⲉⲥⲥⲱⲧ̅ⲙ̅ <text:line-break/><text:span text:style-name="T1"> </text:span><text:span text:style-name="T2">(53/38) </text:span> ⲇⲉ ⲉϯϭⲟⲙ· ⲁⲩⲱ ⲁⲥⲙⲟⲩϩ <text:line-break/><text:span text:style-name="T1"> </text:span><text:span text:style-name="T2">(54/4) </text:span> (Lines 1--4 lacking) <text:line-break/><text:span text:style-name="T1"> </text:span><text:span text:style-name="T2">(54/5) </text:span> [ 15+- ].ⲛ̣ⲉ̣ <text:line-break/><text:span text:style-name="T1"> </text:span><text:span text:style-name="T2">(54/6) </text:span> [ 13+- ]ⲇⲉ ⲛ̅ⲧ̅ⲕ̅ <text:line-break/><text:span text:style-name="T1"> </text:span><text:span text:style-name="T2">(54/7) </text:span> [ 11+- ]̅ⲩ̅ⲥ̅· ⲥⲟⲗⲙⲓⲥ· <text:line-break/><text:span text:style-name="T1"> </text:span><text:span text:style-name="T2">(54/8) </text:span> [ 8+- ⲕ]ⲁⲧⲁ ϯⲙ̅ⲛ̅ⲧ̅’̅ⲱⲛ̅ϩ̅ <text:line-break/><text:span text:style-name="T1"> </text:span><text:span text:style-name="T2">(54/9) </text:span> [ⲉⲧ]ⲛ̣̅ⲧ̣[ⲁⲕ ⲙ̅ⲛ̅] ϯϣⲟⲣ̅ⲡ̅ ⲛ̅ⲉⲛⲉⲣ <text:line-break/><text:span text:style-name="T1"> </text:span><text:span text:style-name="T2">(54/10) </text:span> [ⲅ]ⲓ̣[ⲁ] ⲧⲏ ⲉⲧ[ⲉ] ⲉ̣ⲃⲟⲗ ⲙ̅ⲙⲟⲥ ⲧⲉ <text:line-break/><text:span text:style-name="T1"> </text:span><text:span text:style-name="T2">(54/11) </text:span> ϯ̣ⲙ̅ⲛ̅ⲧ̅’̅ⲛⲟ̣ⲩ̣ⲧⲉ· ⲛ̅ⲧ̅ⲕ̅ ⲟⲩⲛⲟϭ̣ <text:line-break/><text:span text:style-name="T1"> </text:span><text:span text:style-name="T2">(54/12) </text:span> ⲁⲣⲙⲏⲇⲱⲛ[·] ⲛ̅ⲧ̅ⲕ̅ ⲟⲩⲧⲉⲗⲓⲟ̣[ⲥ] <text:line-break/><text:span text:style-name="T1"> </text:span><text:span text:style-name="T2">(54/13) </text:span> ⲉⲡⲓⲫⲁⲛⲉⲩ· ⲕⲁⲧⲁ ⲇⲉ ϯⲉⲛ̣[ⲉ]ⲣ̣ <text:line-break/><text:span text:style-name="T1"> </text:span><text:span text:style-name="T2">(54/14) </text:span> ⲅⲓⲁ ⟦ⲇⲉ⟧ ⲉⲧ̅ⲛ̅ⲧⲁⲕ· ϯϭⲟⲙ ⲙ̅ⲙⲉϩ <text:line-break/><text:span text:style-name="T1"> </text:span><text:span text:style-name="T2">(54/15) </text:span> ⲥ̅ⲛ̅ⲧⲉ ⲙ̅ⲛ̅ ϯⲙ̅ⲛⲧ’̅ⲉⲓⲙⲉ· ⲧⲏ ⲉ <text:line-break/><text:span text:style-name="T1"> </text:span><text:span text:style-name="T2">(54/16) </text:span> ⲧⲉ ⲉⲃⲟⲗ ⲙ̅ⲙⲟ〈ⲥ〉 ⲧⲉ ϯⲙ̅ⲛ̅ⲧ̅’̅ⲙⲁ <text:line-break/><text:span text:style-name="T1"> </text:span><text:span text:style-name="T2">(54/17) </text:span> ⲕⲁⲣⲓⲟⲥ· ⲁ̅ⲩ̅ⲧ̅ⲟ̅ⲏ̅ⲣ̅· ⲃ̅ⲏⲣⲓⲑⲉⲩ̅· <text:line-break/><text:span text:style-name="T1"> </text:span><text:span text:style-name="T2">(54/18) </text:span> ⲏ̅ⲣ̅ⲓ̅ⲅ̅ⲉ̅ⲛ̅ⲁ̅ⲱ̅ⲣ̅· ⲱ̅ⲣⲓⲙⲉⲛⲓⲉ̅· ⲁ̅ⲣⲁ̅ <text:line-break/><text:span text:style-name="T1"> </text:span><text:span text:style-name="T2">(54/19) </text:span> ⲙ̅ⲉ̅ⲛ̅· ⲁ̅ⲗⲫⲗⲉⲅⲉⲥ̅· ⲏ̅ⲗⲏⲗⲓⲟⲩⲫⲉⲩ̅· <text:line-break/><text:span text:style-name="T1"> </text:span><text:span text:style-name="T2">(54/20) </text:span> [[̅ⲗ̅]̅ⲁ̅ⲗ̅ⲁ̅ⲙ̅ⲉ̅ⲩ̅· ⲓ̅ⲉⲑⲉⲩ̅· ⲛⲟⲏⲑⲉⲩ[·] <text:line-break/><text:soft-page-break/><text:span text:style-name="T1"> </text:span><text:span text:style-name="T2">(54/21) </text:span> ⲛ̅ⲧ̅ⲕ̅ ⲟⲩⲛⲟϭ ⲡⲏ ⲉⲧ’ⲉⲓⲙⲉ ⲉⲣⲟ[ⲕ] <text:line-break/><text:span text:style-name="T1"> </text:span><text:span text:style-name="T2">(54/22) </text:span> ϥⲓⲙⲉ ⲉⲡⲧⲏⲣ̅ϥ̅· ⲛ̅ⲧ̅ⲕ̅ ⲟⲩⲁ ⲛ̅ <text:line-break/><text:span text:style-name="T1"> </text:span><text:span text:style-name="T2">(54/23) </text:span> ⲧ̅ⲕ̅ ⲟⲩⲁ ⲡⲏ ⲉⲧⲛⲁⲛⲟⲩϥ ⲁ̅ⲫⲣⲏ̣̅ <text:line-break/><text:span text:style-name="T1"> </text:span><text:span text:style-name="T2">(54/24) </text:span> ⲇⲱⲛ· ⲛ̅ⲧⲟⲕ ⲡⲉ ⲡⲉⲱⲛ ⲛ̅ⲧⲉ <text:line-break/><text:span text:style-name="T1"> </text:span><text:span text:style-name="T2">(54/25) </text:span> ⲛⲉⲱⲛ ⲡⲏ ⲉⲧ’ϣⲟⲟⲡ ⲛ̅ⲟⲩⲟ <text:line-break/><text:span text:style-name="T1"> </text:span><text:span text:style-name="T2">(54/26) </text:span> ⲉⲓϣ ⲛⲓⲙ· ⲧⲟⲧⲉ ⲁⲥⲥⲙⲟⲩ ⲉ <text:line-break/><text:span text:style-name="T1"> </text:span><text:span text:style-name="T2">(54/27) </text:span> ⲡⲓⲟⲩⲁ ⲧⲏⲣ̅ϥ̅ ⲉⲥϫⲱ ⲙ̅ⲙⲟⲥ <text:line-break/><text:span text:style-name="T1"> </text:span><text:span text:style-name="T2">(54/28) </text:span> ϫⲉ ⲗ̅ⲁ̅ⲗ̅ⲁ̅ⲙ̅ⲉ̅ⲩ̅· ⲛ̅ⲟ̣[ⲏⲑ]ⲉ̣ⲩ̅· ⲥ̅ⲏ̅ <text:line-break/><text:span text:style-name="T1"> </text:span><text:span text:style-name="T2">(54/29) </text:span> ⲛ̅ⲁ̅ⲱ̅ⲛ· ⲁ̅ⲥⲓⲛⲉ̅[ⲩ..]ⲣ̣ⲓ̅ⲫⲁⲛⲓⲉ̅ <text:line-break/><text:span text:style-name="T1"> </text:span><text:span text:style-name="T2">(54/30) </text:span> ⲙ̅ⲉ̅ⲗ̅ⲗ̅ⲉ̅ⲫ̅ⲁ̅ⲛ̅ⲉ̅ⲩ̅[·] ⲉ̅ⲗ̣ⲉⲙⲁⲱⲛⲓ̅ <text:line-break/><text:span text:style-name="T1"> </text:span><text:span text:style-name="T2">(54/31) </text:span> ⲥ̅ⲙ̅ⲟ̅ⲩ̅ⲛ̅· ⲟ̅ⲡⲧⲁⲱⲛ̅· ⲡⲏ ⲉⲧ’ <text:line-break/><text:span text:style-name="T1"> </text:span><text:span text:style-name="T2">(54/32) </text:span> ϣⲟⲟⲡ· ⲛ̅ⲧⲟⲕ ⲡⲉ ⲡⲉⲧ’ϣⲟ <text:line-break/><text:span text:style-name="T1"> </text:span><text:span text:style-name="T2">(54/33) </text:span> ⲟⲡ ⲡⲓⲉⲱⲛ ⲛ̅ⲧⲉ ⲛⲉⲱⲛ· ⲡⲓ̣ <text:line-break/><text:span text:style-name="T1"> </text:span><text:span text:style-name="T2">(54/34) </text:span> ⲁⲧ’ϫⲡⲟ ⲉⲧ’ϫⲟⲥⲉ ⲉⲛⲓⲁⲧ’ϫⲡⲟ <text:line-break/><text:span text:style-name="T1"> </text:span><text:span text:style-name="T2">(54/35) </text:span> ⲓ̈ⲁ̅ⲧ̅ⲟ̅ⲙ̅ⲉ̅ⲛ̅ⲉ̅· ⲛ̅ⲧⲟⲕ ⲟⲩⲁⲁⲕ <text:line-break/><text:span text:style-name="T1"> </text:span><text:span text:style-name="T2">(54/36) </text:span> ⲉⲧⲁⲩϫⲡⲟ ⲛⲁⲕ ⲛ̅ⲛⲓⲁⲧ’ⲙⲓ <text:line-break/><text:span text:style-name="T1"> </text:span><text:span text:style-name="T2">(54/37) </text:span> ⲥⲉ ⲧⲏⲣⲟⲩ· ⲡⲓⲁⲧ’ϯⲣⲁⲛ ⲉ <text:line-break/><text:span text:style-name="T1"> </text:span><text:span text:style-name="T2">(55/1) </text:span> [ⲣⲟϥ <text:line-break/><text:span text:style-name="T1"> </text:span><text:span text:style-name="T2">(55/9) </text:span> (Lines 1--9 lacking) <text:line-break/><text:span text:style-name="T1"> </text:span><text:span text:style-name="T2">(55/10) </text:span> [ 12+- ].[ <text:line-break/><text:span text:style-name="T1"> </text:span><text:span text:style-name="T2">(55/11) </text:span> [ 6+- ⲙ̅ⲛ̅ⲧ̅’̅]ⲉ̣ⲓⲙⲉ ⲁ <text:line-break/><text:span text:style-name="T1"> </text:span><text:span text:style-name="T2">(55/12) </text:span> [ⲛⲟⲕ ⲇⲉ ⲛ̅ⲧⲁⲣⲓ]ⲥ̣[ⲱ]ⲧ̅ⲙ̅ ⲉⲛⲁⲓ̈ ⲁⲉⲓ <text:line-break/><text:span text:style-name="T1"> </text:span><text:span text:style-name="T2">(55/13) </text:span> [ⲛⲁⲩ ⲉⲛⲉⲟⲟⲩ] ⲛ̅ⲛ̣ⲓ̣ⲕⲁⲧⲁ ⲟⲩⲁ <text:line-break/><text:span text:style-name="T1"> </text:span><text:span text:style-name="T2">(55/14) </text:span> [ⲛ̅ⲧⲉⲗⲓⲟⲥ ⲁⲩ]ⲱ̣ ⲛⲓⲡⲁⲛⲧⲉⲗⲓⲟⲥ <text:line-break/><text:span text:style-name="T1"> </text:span><text:span text:style-name="T2">(55/15) </text:span> [ⲛⲏ ⲉⲧ’ϣⲟⲟⲡ ϩ̅ⲓ̅]ⲟ̣ⲩⲙⲁ· ⲙ̅ⲛ̅ ⲛⲓ <text:line-break/><text:span text:style-name="T1"> </text:span><text:span text:style-name="T2">(55/16) </text:span> [ⲡⲁⲛⲧⲉⲗⲓⲟⲥ ⲉ]ⲧ̣ϩⲁⲑⲏ ⲛ̅ⲛⲓⲧⲉ <text:line-break/><text:span text:style-name="T1"> </text:span><text:span text:style-name="T2">(55/17) </text:span> [ⲗⲓⲟⲥ· ⲡⲁⲗⲕⲓⲛ] ⲟⲛ ⲡⲉϫⲁⲥ ⲛⲁⲓ̈ <text:line-break/><text:span text:style-name="T1"> </text:span><text:span text:style-name="T2">(55/18) </text:span> [ⲛ̅ϭⲓ ⲧⲁⲛ̅ⲛⲟϭ] ⲛ̣ⲉⲟⲟⲩ ⲓ̈ⲟ̅ⲩ̅ⲏ̅ⲗ̅· <text:line-break/><text:span text:style-name="T1"> </text:span><text:span text:style-name="T2">(55/19) </text:span> [ϫⲉ ⲡⲁⲗⲗⲟⲅⲉ]ⲛⲏⲥ ϩ̅ⲛ̅ ⲟⲩⲉⲓ <text:line-break/><text:span text:style-name="T1"> </text:span><text:span text:style-name="T2">(55/20) </text:span> [ⲙⲉ ⲛ̅ⲁⲧ’ ⲉⲓⲙⲉ] ⲉⲕⲉⲓⲙⲉ· ϫⲉ ⲡⲓ <text:line-break/><text:span text:style-name="T1"> </text:span><text:span text:style-name="T2">(55/21) </text:span> [ϣⲟⲙⲧ’ ⲛ̅ϭⲟ]ⲙ ϥϣⲟⲟⲡ ϩⲁ <text:line-break/><text:span text:style-name="T1"> </text:span><text:span text:style-name="T2">(55/22) </text:span> [ⲑⲏ ⲛ̅ⲛⲓⲉⲟⲟⲩ] ⲛ̅ⲥⲉϣⲟⲟⲡ ⲁⲛ <text:line-break/><text:span text:style-name="T1"> </text:span><text:span text:style-name="T2">(55/23) </text:span> [ⲙ̅ⲛ̅ ⲛⲉⲧ’ϣⲟ]ⲟⲡ ⲛ̅ⲥⲉϣⲟⲟⲡ <text:line-break/><text:span text:style-name="T1"> </text:span><text:span text:style-name="T2">(55/24) </text:span> [ⲁⲛ ϩ̅ⲓ̅ ⲟⲩⲙⲁ] ⲙ̅ⲛ̅ ⲛⲏ ⲉⲧ’ϣⲟⲟⲡ <text:line-break/><text:span text:style-name="T1"> </text:span><text:span text:style-name="T2">(55/25) </text:span> [ⲟⲩⲧⲉ ⲛⲏ ⲉⲧ’ϣ]ⲟⲟⲡ ⲟⲛⲧⲱⲥ <text:line-break/><text:span text:style-name="T1"> </text:span><text:span text:style-name="T2">(55/26) </text:span> [ⲁⲗⲗⲁ ⲛⲁⲓ̈ ⲧⲏⲣ]ⲟⲩ ⲉ̣ⲩϣⲟⲟⲡ <text:line-break/><text:span text:style-name="T1"> </text:span><text:span text:style-name="T2">(55/27) </text:span> [ⲛ̅ⲟⲩⲙ̅ⲛ̅ⲧ̅’̅ⲛⲟⲩ]ⲧⲉ ⲙ̅ⲛ̅ ⲟⲩⲙ̅ⲛⲧ’̅ <text:line-break/><text:span text:style-name="T1"> </text:span><text:span text:style-name="T2">(55/28) </text:span> [ⲙⲁⲕⲁⲣⲓⲟⲥ ⲙ̅ⲛ̅] ⲟⲩϩⲩⲡⲁⲣⲝⲓⲥ· <text:line-break/><text:span text:style-name="T1"> </text:span><text:span text:style-name="T2">(55/29) </text:span> [ⲁⲩⲱ ⲛ̅ⲟⲩⲙ̅ⲛ̅ⲧ̅’̅]ⲁ̣ⲧⲟⲩⲥⲓⲁ ⲙ̅ⲛ̅ <text:line-break/><text:span text:style-name="T1"> </text:span><text:span text:style-name="T2">(55/30) </text:span> [ⲟⲩϩⲩⲡⲁⲣⲝⲓⲥ] ⲛ̅ⲁⲧ’ϣⲱⲡⲉ· <text:line-break/><text:span text:style-name="T1"> </text:span><text:span text:style-name="T2">(55/31) </text:span> [ⲁⲩⲱ ⲧⲟⲧⲉ ⲁ]ⲉ̣[ⲓ]ⲧ̣ⲱⲃ̅ϩ̅ ϫⲉ ⲉⲣⲉ <text:line-break/><text:span text:style-name="T1"> </text:span><text:span text:style-name="T2">(55/32) </text:span> [ⲡⲟⲩⲱⲛ̅ϩ̅ ⲉⲃ]ⲟⲗ ϣⲱⲡⲉ ⲛⲁⲓ̈ <text:line-break/><text:span text:style-name="T1"> </text:span><text:span text:style-name="T2">(55/33) </text:span> [ⲁⲩⲱ ⲧⲟⲧⲉ ⲡⲉ]ϫⲁⲥ ⲛⲁⲓ̈ ⲛ̅ϭⲓ <text:line-break/><text:span text:style-name="T1"> </text:span><text:span text:style-name="T2">(55/34) </text:span> [ⲧⲁⲛⲓⲉⲟⲟⲩ] ⲧ̣ⲏⲣⲟⲩ ⲓ̈ⲟ̅ⲩ̅ⲏ̅ⲗ̅ <text:line-break/><text:span text:style-name="T1"> </text:span><text:span text:style-name="T2">(55/35) </text:span> [ϫⲉ ⲱ͂ ⲡⲁⲗⲗⲟⲅ]ⲉ̣ⲛⲏⲥ ⲙⲉⲛ <text:line-break/><text:span text:style-name="T1"> </text:span><text:span text:style-name="T2">(55/36) </text:span> [ⲧⲟⲓ ⲡⲓϣⲙ̅ⲛ̅]ⲧ’ϩⲟⲟⲩⲧ’ ⲉⲩ <text:line-break/><text:span text:style-name="T1"> </text:span><text:span text:style-name="T2">(55/37) </text:span> [ⲗⲁⲁⲩ ⲡⲉ ⲛ̅ⲥ]ⲁ̣ ⲟⲩⲟⲩⲥⲓⲁ· <text:line-break/><text:soft-page-break/><text:span text:style-name="T1"> </text:span><text:span text:style-name="T2">(55/38) </text:span> [ⲉⲛⲉⲩⲁⲧⲟⲩ]ⲥ̣ⲓⲁ ⲇⲉ ⲡⲉ ⲡⲓ <text:line-break/><text:span text:style-name="T1"> </text:span><text:span text:style-name="T2">(56/7) </text:span> (Lines 1--7 lacking) <text:line-break/><text:span text:style-name="T1"> </text:span><text:span text:style-name="T2">(56/8) </text:span> [ ⲉ] <text:line-break/><text:span text:style-name="T1"> </text:span><text:span text:style-name="T2">(56/9) </text:span> [ⲃ]ⲟ̣ⲗ̣[ <text:line-break/><text:span text:style-name="T1"> </text:span><text:span text:style-name="T2">(56/10) </text:span> ⲛⲏ ⲉⲧ’ϣⲟ̣[ⲟ]ⲡ̣ [ϩ̅ⲛ̅ ⲟⲩⲥⲩⲥⲧⲁ] <text:line-break/><text:span text:style-name="T1"> </text:span><text:span text:style-name="T2">(56/11) </text:span> ⲥⲓⲥ ⲙ̅ⲛ̅ ϯ[ⲅ]ⲉ[ⲛⲉⲁ ⲛ̅ⲧⲉ ⲛⲏ] <text:line-break/><text:span text:style-name="T1"> </text:span><text:span text:style-name="T2">(56/12) </text:span> ⲉⲧ’ϣⲟⲟⲡ ⲟ̣[ⲛⲧⲱⲥ· ⲉⲩϣⲟ] <text:line-break/><text:span text:style-name="T1"> </text:span><text:span text:style-name="T2">(56/13) </text:span> ⲟⲡ ⲛ̅ϭⲓ ⲛⲓⲁⲩⲧ[ⲟⲅⲉⲛⲏⲥ ⲉ] <text:line-break/><text:span text:style-name="T1"> </text:span><text:span text:style-name="T2">(56/14) </text:span> ϩⲣⲁⲓ̈ ⲉⲡⲓϣ[ⲙ̅ⲛ̅ⲧ̅’̅ϩⲟⲟⲩⲧ’· ⲉ] <text:line-break/><text:span text:style-name="T1"> </text:span><text:span text:style-name="T2">(56/15) </text:span> ϣⲱⲡⲉ ⲉⲕϣⲁ[ⲛϣⲓⲛⲉ ϩ̅ⲛ̅ ⲟⲩ] <text:line-break/><text:span text:style-name="T1"> </text:span><text:span text:style-name="T2">(56/16) </text:span> ϣⲓⲛⲉ ⲉϥϫⲏ[ⲕ ⲉⲃⲟⲗ· ⲧⲟⲧⲉ] <text:line-break/><text:span text:style-name="T1"> </text:span><text:span text:style-name="T2">(56/17) </text:span> ⲉⲕⲉⲉⲓⲙⲉ ⲉⲡ̣[ⲓⲁⲅⲁⲑⲟⲛ ⲉⲧ̅ⲛ̅] <text:line-break/><text:span text:style-name="T1"> </text:span><text:span text:style-name="T2">(56/18) </text:span> ϩⲏⲧ̅ⲕ̅· ⲧⲟⲧⲉ ⲉ̣[ⲕⲉⲉⲓⲙⲉ ⲉⲣⲟⲕ] <text:line-break/><text:span text:style-name="T1"> </text:span><text:span text:style-name="T2">(56/19) </text:span> ϩⲱⲱⲕ· ⲡⲏ ⲉⲧ[ϣⲟⲟⲡ ⲉⲃⲟⲗ ϩ̅ⲙ̅] <text:line-break/><text:span text:style-name="T1"> </text:span><text:span text:style-name="T2">(56/20) </text:span> ⲡⲛⲟⲩⲧⲉ ⲉⲧⲣ̅[ϣⲟⲣ̅ⲡ̅ ⲛ̅ϣⲟⲟⲡ] <text:line-break/><text:span text:style-name="T1"> </text:span><text:span text:style-name="T2">(56/21) </text:span> ⲟⲛⲧⲱⲥ· ⲙ̅ⲛ̅ ⲛ̣̅[ⲥⲁ ϣⲉ ⲅⲁⲣ ⲛ̅] <text:line-break/><text:span text:style-name="T1"> </text:span><text:span text:style-name="T2">(56/22) </text:span> ⲣⲟⲙⲡⲉ ⲉϥⲉ[ϣⲱⲡⲉ ⲛⲁⲕ ⲛ̅] <text:line-break/><text:span text:style-name="T1"> </text:span><text:span text:style-name="T2">(56/23) </text:span> ϭⲓ ⲟⲩϭⲱⲗ̅ⲡ̅ ⲉⲃ̣[ⲟⲗ ⲛ̅ⲧⲉ ⲡⲏ ⲉ] <text:line-break/><text:span text:style-name="T1"> </text:span><text:span text:style-name="T2">(56/24) </text:span> ⲃⲟⲗ ϩ̅ⲓ̅ⲧⲟⲟⲧ̅ϥ̅[ⲛ̅ⲥ̅ⲁⲗⲁⲙⲉⲝ̅] <text:line-break/><text:span text:style-name="T1"> </text:span><text:span text:style-name="T2">(56/25) </text:span> ⲙ̅ⲛ̅ ⲥ̅ⲉ〈ⲗ〉ⲙⲉⲛ̅· ⲙ[ⲛ̅ ⲁ̅ⲣ..ⲏ̅ ⲛⲓ] <text:line-break/><text:span text:style-name="T1"> </text:span><text:span text:style-name="T2">(56/26) </text:span> ⲫⲱⲥⲧⲏⲣ ⲛ̅ⲧ[ⲉ ⲡⲓⲉⲱⲛ ⲛ̅ⲃⲁⲣ] <text:line-break/><text:span text:style-name="T1"> </text:span><text:span text:style-name="T2">(56/27) </text:span> ⲃⲏⲗⲱ· ⲁⲩⲱ ⲡ̣[ⲓⲡⲁⲣⲁ ⲡⲉⲧ’] <text:line-break/><text:span text:style-name="T1"> </text:span><text:span text:style-name="T2">(56/28) </text:span> ϣ̅ϣⲉ ⲉⲣⲟⲕ ⲛ̣[ⲉⲕⲉⲓⲙⲉ ⲉⲣⲟϥ] <text:line-break/><text:span text:style-name="T1"> </text:span><text:span text:style-name="T2">(56/29) </text:span> ⲛ̅ϣⲟⲣ̅ⲡ̅ ϫⲉ ⲛ[ⲉⲕϯ ⲟⲥⲉ ⲙ̅ⲡⲉⲕ] <text:line-break/><text:span text:style-name="T1"> </text:span><text:span text:style-name="T2">(56/30) </text:span> ⲅⲉⲛⲟⲥ ⲉϣ[ⲱⲡⲉ ⲇⲉ ⲛ̅ϯϩⲉ] <text:line-break/><text:span text:style-name="T1"> </text:span><text:span text:style-name="T2">(56/31) </text:span> ⲧⲟⲧⲉ ⲉϣⲱⲡ̣[ⲉ ⲉⲕϣⲁⲛϫⲓ] <text:line-break/><text:span text:style-name="T1"> </text:span><text:span text:style-name="T2">(56/32) </text:span> ⲛ̅ⲟⲩⲉⲛⲛⲟ[ⲓⲁ ⲛ̅ⲧⲉ ⲡⲏ· ⲧⲟⲧⲉ] <text:line-break/><text:span text:style-name="T1"> </text:span><text:span text:style-name="T2">(56/33) </text:span> ⲉϣⲁⲩϫⲱⲕ̣ [ⲙ̅ⲙⲟⲕ ⲉⲃⲟⲗ ϩ̅ⲙ̅] <text:line-break/><text:span text:style-name="T1"> </text:span><text:span text:style-name="T2">(56/34) </text:span> ⲡϣⲁϫⲉ ⲉϩ[ⲣⲁⲓ̈ ⲉⲡϫⲱⲕ ⲉⲃⲟⲗ·] <text:line-break/><text:span text:style-name="T1"> </text:span><text:span text:style-name="T2">(56/35) </text:span> ⲁⲩⲱ ⲧⲟⲧⲉ [ϣⲁⲕϣⲱⲡⲉ ⲛ̅ⲛⲟⲩ] <text:line-break/><text:span text:style-name="T1"> </text:span><text:span text:style-name="T2">(56/36) </text:span> ⲧⲉ· ⲁⲩⲱ ϣ[ⲁⲕⲣ̅ ⲧⲉⲗⲓⲟⲥ· ⲉⲕϫⲓ] <text:line-break/><text:span text:style-name="T1"> </text:span><text:span text:style-name="T2">(56/37) </text:span> ⲙⲉⲛ ⲙ̅ⲙⲟⲟ̣[ⲩ <text:line-break/><text:span text:style-name="T1"> </text:span><text:span text:style-name="T2">(57/4) </text:span> (Lines 1--4 lacking) <text:line-break/><text:span text:style-name="T1"> </text:span><text:span text:style-name="T2">(57/5) </text:span> [..].. ⲡ̣ϣⲓ̣ⲛ̣[ⲉ <text:line-break/><text:span text:style-name="T1"> </text:span><text:span text:style-name="T2">(57/6) </text:span> [..] ϯϩⲩⲡⲁⲣⲝ[ⲓⲥ <text:line-break/><text:span text:style-name="T1"> </text:span><text:span text:style-name="T2">(57/7) </text:span> [ⲉ]ϣⲱⲡⲉ ⲉⲥϣⲁ[ⲛⲁⲙⲁϩⲧⲉ ⲛ̅ⲟⲩ] <text:line-break/><text:span text:style-name="T1"> </text:span><text:span text:style-name="T2">(57/8) </text:span> [ⲗ]ⲁ̣ⲁⲩ ⲉϣⲁⲩⲁⲙⲁ[ϩⲧⲉ ⲙ̅ⲙⲟⲥ ⲉⲃⲟⲗ] <text:line-break/><text:span text:style-name="T1"> </text:span><text:span text:style-name="T2">(57/9) </text:span> [ϩ̅ⲓ̅]ⲧ̅ⲙ̅ ⲡⲏ ⲉⲧ̅ⲙ̅ⲙⲁⲩ· ⲙⲛ̣̅ ⲉ̣ⲃⲟⲗ̣ ϩ̣̅ⲓ̣̅‐ <text:line-break/><text:span text:style-name="T1"> </text:span><text:span text:style-name="T2">(57/10) </text:span> ⲧ̣ⲟⲟⲧ̅ϥ̅ ⲙ̅ⲡⲏ ⲉⲧⲟⲩⲧⲁϩⲟ ⲙ̅ⲙⲟϥ <text:line-break/><text:span text:style-name="T1"> </text:span><text:span text:style-name="T2">(57/11) </text:span> [ⲉ]ⲧⲉ ⲡⲁⲓ̈ ⲡⲉ· ⲁⲩⲱ ⲧⲟⲧⲉ ⲉϣⲁϥ <text:line-break/><text:span text:style-name="T1"> </text:span><text:span text:style-name="T2">(57/12) </text:span> ϣ̣ⲱⲡⲉ ⲉⲛⲉⲁϥ ⲛ̅ϩⲟⲩⲟ ⲛ̅ϭⲓ ⲡⲏ <text:line-break/><text:span text:style-name="T1"> </text:span><text:span text:style-name="T2">(57/13) </text:span> [ⲉ]ⲧ’ⲧⲉϩⲟ ⲁⲩⲱ ⲉⲧ’ⲉⲓⲙⲉ ⲛ̅ϩⲟⲩⲟ̅· <text:line-break/><text:span text:style-name="T1"> </text:span><text:span text:style-name="T2">(57/14) </text:span> ⲉ̣[ⲡ]ⲏ ⲉⲧⲟⲩⲧⲁϩⲟ ⲙ̅ⲙⲟϥ ⲁⲩⲱ <text:line-break/><text:span text:style-name="T1"> </text:span><text:span text:style-name="T2">(57/15) </text:span> ⲉⲧⲟⲩⲉⲓⲙⲉ ⲉⲣⲟϥ· ⲉϣⲱⲡⲉ <text:line-break/><text:span text:style-name="T1"> </text:span><text:span text:style-name="T2">(57/16) </text:span> ⲇⲉ ⲉϥϣⲁⲛⲉ̅ⲓ̅ ⲉϩⲣⲁⲓ̈ ⲉⲧⲉϥⲫⲩ <text:line-break/><text:span text:style-name="T1"> </text:span><text:span text:style-name="T2">(57/17) </text:span> ⲥⲓⲥ ϣⲁϥⲑ̅ⲃ̅ⲃⲓⲟ· ⲛⲓⲫⲩⲥⲓⲥ ⲅⲁⲣ <text:line-break/><text:span text:style-name="T1"> </text:span><text:span text:style-name="T2">(57/18) </text:span> ⲛ̅ⲛⲁⲧⲥⲱⲙⲁ ⲙ̅ⲡⲟⲩⲣ̅ϣⲃⲏⲣ ⲉ <text:line-break/><text:soft-page-break/><text:span text:style-name="T1"> </text:span><text:span text:style-name="T2">(57/19) </text:span> ⲗⲁⲁⲩ ⲙ̅ⲙ̅ⲛ̅ⲧⲛⲟϭ· ⲉⲩⲛ̅ⲧⲁⲩ <text:line-break/><text:span text:style-name="T1"> </text:span><text:span text:style-name="T2">(57/20) </text:span> ⲛ̅ⲧⲉⲓ̈ϭⲟⲙ ⲉⲩϩ̅ⲛ̅ ⲧⲟⲡⲟⲥ ⲛⲓⲙ· <text:line-break/><text:span text:style-name="T1"> </text:span><text:span text:style-name="T2">(57/21) </text:span> ⲁⲩⲱ ⲉⲛⲥⲉϩ̅ⲛ̅ⲗⲁⲁⲩ ⲛ̅ⲧⲟⲡⲟⲥ <text:line-break/><text:span text:style-name="T1"> </text:span><text:span text:style-name="T2">(57/22) </text:span> ⲁⲛ· ⲉⲛⲉⲁⲩ ⲉⲙ̅ⲛ̅ⲧⲛⲟϭ ⲛⲓⲙ· <text:line-break/><text:span text:style-name="T1"> </text:span><text:span text:style-name="T2">(57/23) </text:span> ⲁⲩⲱ ⲥⲉⲑ̅ⲃ̅ⲃⲓⲏⲟⲩⲧ’ ⲉⲙ̅ⲛⲧ’̅ⲕⲟⲩ <text:line-break/><text:span text:style-name="T1"> </text:span><text:span text:style-name="T2">(57/24) </text:span> ⲉⲓ ⲛⲓⲙ· ⲛⲁⲓ̈ ⲇⲉ ⲛ̅ⲧⲁⲥϫⲟⲟⲩ ⲛ̅ <text:line-break/><text:span text:style-name="T1"> </text:span><text:span text:style-name="T2">(57/25) </text:span> ϭⲓ ⲧⲁⲛⲓⲉⲟⲟⲩ ⲧⲏⲣⲟⲩ ⲓ̈ⲟ̅ⲩ̅ⲏ̅ⲗ̅· <text:line-break/><text:span text:style-name="T1"> </text:span><text:span text:style-name="T2">(57/26) </text:span> ⲁⲥⲡⲱⲣ̅ϫ̅ ⲉⲃⲟⲗ ⲙ̅ⲙⲟⲓ̈ ⲁⲥⲕⲁ <text:line-break/><text:span text:style-name="T1"> </text:span><text:span text:style-name="T2">(57/27) </text:span> ⲁⲧ’· ⲁⲛⲟⲕ ⲇⲉ ⲙ̅ⲡⲓⲕⲁ ⲧⲟⲟⲧ’ <text:line-break/><text:span text:style-name="T1"> </text:span><text:span text:style-name="T2">(57/28) </text:span> ⲉⲃⲟⲗ ϩ̅ⲛ̅ ⲛⲓϣⲁϫⲉ ⲉⲧⲁⲓ̈ⲥⲱⲧ̅ⲙ̅ <text:line-break/><text:span text:style-name="T1"> </text:span><text:span text:style-name="T2">(57/29) </text:span> ⲉⲣⲟⲟⲩ· ⲁⲉⲓⲥⲟⲃⲧⲉ ⲙ̅ⲙⲟⲓ̈ ⲛ̅ <text:line-break/><text:span text:style-name="T1"> </text:span><text:span text:style-name="T2">(57/30) </text:span> ϩⲏⲧⲟⲩ· ⲁⲩⲱ ⲛⲉⲓ̈ϣⲟϫⲛⲉ ⲙ̅ <text:line-break/><text:span text:style-name="T1"> </text:span><text:span text:style-name="T2">(57/31) </text:span> ⲙⲟⲉⲓ ⲡⲉ ϩ̅ⲛ̅ ϯϣⲉ ⲛ̅ⲣⲟⲙⲡⲉ· <text:line-break/><text:span text:style-name="T1"> </text:span><text:span text:style-name="T2">(57/32) </text:span> ⲁⲛⲟⲕ ⲇⲉ ⲛⲉⲓ̈ⲧⲉⲗⲏⲗ ⲙ̅ⲙⲟⲓ̈ ⲉ <text:line-break/><text:span text:style-name="T1"> </text:span><text:span text:style-name="T2">(57/33) </text:span> ⲙⲁⲧⲉ ⲉⲓ̈ϣⲟⲟⲡ ϩ̅ⲛ̅ ⲟⲩⲛⲟϭ <text:line-break/><text:span text:style-name="T1"> </text:span><text:span text:style-name="T2">(57/34) </text:span> ⲛ̅ⲟⲩⲟⲉⲓⲛ ⲙ̅ⲛ̅ ⲟⲩϩ̅ⲓ̅ⲏ ⲙ̅ⲙⲁ <text:line-break/><text:span text:style-name="T1"> </text:span><text:span text:style-name="T2">(57/35) </text:span> ⲕⲁⲣⲓⲟⲥ· ϫⲉ ⲛⲏ ⲙⲉⲛ ⲉⲧⲁⲉⲓ <text:line-break/><text:span text:style-name="T1"> </text:span><text:span text:style-name="T2">(57/36) </text:span> ⲙ̅ⲡϣⲁ ⲛ̅ⲛⲁⲩ ⲉⲣⲟⲟⲩ· ⲁⲩⲱ <text:line-break/><text:span text:style-name="T1"> </text:span><text:span text:style-name="T2">(57/37) </text:span> ⲟⲛ ⲛⲏ ⲉⲧⲁⲉⲓⲙ̅ⲡϣⲁ ⲛ̅ⲥⲱ <text:line-break/><text:span text:style-name="T1"> </text:span><text:span text:style-name="T2">(57/38) </text:span> ⲧ̅ⲙ̅ ⲉⲣⲟⲟⲩ· ⲛⲏ ⲉⲧⲉϣϣⲉ <text:line-break/><text:span text:style-name="T1"> </text:span><text:span text:style-name="T2">(57/39) </text:span> ⲛ̅ⲧⲉ ⲛⲓⲛⲟϭ ⲛ̅ϭⲟⲙ ⲟⲩⲁⲁⲩ <text:line-break/><text:span text:style-name="T1"> </text:span><text:span text:style-name="T2">(58/4) </text:span> (Lines 1--4 Lacking) <text:line-break/><text:span text:style-name="T1"> </text:span><text:span text:style-name="T2">(58/5) </text:span> [ 13+- ]. ⲉ̣ⲛ̣.[ <text:line-break/><text:span text:style-name="T1"> </text:span><text:span text:style-name="T2">(58/6) </text:span> [ 10+- ]ⲃ ⲛ̅ⲧⲉ ⲡⲛⲟ̣[ⲩ] <text:line-break/><text:span text:style-name="T1"> </text:span><text:span text:style-name="T2">(58/7) </text:span> [ⲧⲉ ⲉⲧⲁϥϩⲛⲁ]ⲛ̣ ⲉϩⲟⲩⲛ ⲛ̅ϭⲓ̣ [ⲡⲓ] <text:line-break/><text:span text:style-name="T1"> </text:span><text:span text:style-name="T2">(58/8) </text:span> [ϫⲱⲕ ⲉⲃⲟⲗ ⲛ̅ⲧ]ⲉ ϯϣⲉ ⲛ̅ⲣⲟⲙⲡ̣[ⲉ] <text:line-break/><text:span text:style-name="T1"> </text:span><text:span text:style-name="T2">(58/9) </text:span> [ⲁ]ϥ̣[ⲉⲓ]ⲛ̣[ⲉ] ⲛⲁⲓ%9 ⲛ̅ⲛⲟⲩⲙ̅ⲛ̅ⲧ̅’̅ⲙⲁⲕ̣[ⲁ] <text:line-break/><text:span text:style-name="T1"> </text:span><text:span text:style-name="T2">(58/10) </text:span> ⲣⲓⲟⲥ ⲛ̅ⲧⲉ ϯϩⲉⲗⲡⲓⲥ ⲛ̅ϣⲁ ⲉⲛⲉ̣[ϩ] <text:line-break/><text:span text:style-name="T1"> </text:span><text:span text:style-name="T2">(58/11) </text:span> ⲉⲥⲙⲉϩ ⲉⲃⲟⲗ ϩ̅ⲛ̅ ⲟⲩⲙ̅ⲛⲧ’̅ⲭ̅ⲥ̅ <text:line-break/><text:span text:style-name="T1"> </text:span><text:span text:style-name="T2">(58/12) </text:span> ⲁⲓ̈ⲛⲁⲩ ⲉⲡⲓⲁⲅⲁⲑⲟⲥ ⲛ̅ⲁⲩⲧⲟⲅⲉ̣ <text:line-break/><text:span text:style-name="T1"> </text:span><text:span text:style-name="T2">(58/13) </text:span> ⲛⲏⲥ ⲛ̅ⲛⲟⲩⲧⲉ ⲙ̅ⲛ̅ ⲡⲓⲥⲱⲧ[ⲏⲣ] <text:line-break/><text:span text:style-name="T1"> </text:span><text:span text:style-name="T2">(58/14) </text:span> ⲉⲧⲉ ⲡⲁⲓ̈ ⲡⲉ ⲡⲓϣⲙ̅ⲛ̅ⲧ̅’̅ϩⲟ[ⲟⲩ]ⲧ’ <text:line-break/><text:span text:style-name="T1"> </text:span><text:span text:style-name="T2">(58/15) </text:span> ⲛ̅ⲧⲉⲗⲓⲟⲥ ⲛ̅ⲛⲁⲗⲟⲩ· ⲙ̅ⲛ̅ ϯⲙ̅ⲛⲧ’̅ <text:line-break/><text:span text:style-name="T1"> </text:span><text:span text:style-name="T2">(58/16) </text:span> ⲁⲅⲁⲑⲟⲥ ⲛ̅ⲧⲉ ⲡⲁⲓ̈· ⲡⲓⲡⲣⲱⲧⲟ <text:line-break/><text:span text:style-name="T1"> </text:span><text:span text:style-name="T2">(58/17) </text:span> ⲫⲁⲛⲏⲥ ⲛ̅ϩⲁⲣⲙⲏⲇⲱⲛ ⲛ̅ⲧⲉⲗⲓ <text:line-break/><text:span text:style-name="T1"> </text:span><text:span text:style-name="T2">(58/18) </text:span> ⲟⲥ ⲛ̅ⲛⲟⲩⲥ ⲙ̅ⲛ̅ ϯⲙ̅ⲛⲧ’̅ⲙⲁⲕⲁ <text:line-break/><text:span text:style-name="T1"> </text:span><text:span text:style-name="T2">(58/19) </text:span> ⲣⲓⲟⲥ ⲛ̅ⲧⲉ ⲡⲓⲕⲁⲗⲩⲡⲧⲟⲥ· ⲙ̅ⲛ̅ ϯ <text:line-break/><text:span text:style-name="T1"> </text:span><text:span text:style-name="T2">(58/20) </text:span> ϣⲟⲣ̅ⲡ̅ ⲛ̅ⲁⲣⲭⲏ ⲛ̅ⲧⲉ ϯⲙ̅ⲛⲧ’̅ⲙⲁ <text:line-break/><text:span text:style-name="T1"> </text:span><text:span text:style-name="T2">(58/21) </text:span> ⲕⲁⲣⲓⲟⲥ· ⲡⲓⲉⲱⲛ ⲛ̅ⲃⲁ̅ⲣ̅ⲃ̅ⲏ̅ⲗ̅ⲱ̅ <text:line-break/><text:span text:style-name="T1"> </text:span><text:span text:style-name="T2">(58/22) </text:span> ⲉϥⲙⲉϩ ⲉⲃⲟⲗ ϩ̅ⲛ̅ ⲟⲩⲙ̅ⲛⲧ’̅ⲛⲟⲩ <text:line-break/><text:span text:style-name="T1"> </text:span><text:span text:style-name="T2">(58/23) </text:span> ⲧⲉ ⲙ̅ⲛ̅ ϯϣⲟⲣ̅ⲡ̅ ⲛ̅ⲁⲣⲭⲏ ⲛ̅ⲧⲉ <text:line-break/><text:span text:style-name="T1"> </text:span><text:span text:style-name="T2">(58/24) </text:span> ⲡⲓⲁⲧⲁⲣⲭⲏ· ⲡⲓϣⲙ̅ⲛ̅ⲧ̅’̅ϭⲟⲙ ⲛ̅ⲁ <text:line-break/><text:span text:style-name="T1"> </text:span><text:span text:style-name="T2">(58/25) </text:span> ϩⲟⲣⲁⲧⲟⲛ ⲙ̅ⲡ̅ⲛ̅ⲁ̅· ⲡⲓⲧⲏⲣ̅ϥ̅ ⲉⲧ <text:line-break/><text:span text:style-name="T1"> </text:span><text:span text:style-name="T2">(58/26) </text:span> ϫⲟⲥⲉ ⲉⲧⲉⲗⲓⲟⲥ· ⲉⲧⲁⲩⲧⲟⲣⲡ̅[̅2̅ⲧ̅’̅〉 <text:line-break/><text:span text:style-name="T1"> </text:span><text:span text:style-name="T2">(58/27) </text:span> ⲉⲃⲟⲗ ϩ̅ⲓ̅ⲧⲟⲟⲧ̅ϥ̅ ⲙ̅ⲡⲓⲟⲩⲟⲉⲓⲛ <text:line-break/><text:span text:style-name="T1"> </text:span><text:span text:style-name="T2">(58/28) </text:span> ⲛ̅ϣⲁ ⲉⲛⲉϩ· ⲉⲃⲟⲗ ϩ̅ⲓ̅ⲧⲟⲟⲧ̅ϥ̅ <text:line-break/><text:span text:style-name="T1"> </text:span><text:span text:style-name="T2">(58/29) </text:span> ⲙ̅ⲡⲓⲉⲛⲇⲩⲙⲁ ⲉⲧ’ⲧⲟⲉ ϩ̅ⲓ̅ⲱ <text:line-break/><text:soft-page-break/><text:span text:style-name="T1"> </text:span><text:span text:style-name="T2">(58/30) </text:span> ⲱⲧ’· ⲁⲩⲱ ⲁⲩϫⲓⲧ’ ⲉϩⲣⲁⲓ̈ ⲉϫ̅ⲛ̅ <text:line-break/><text:span text:style-name="T1"> </text:span><text:span text:style-name="T2">(58/31) </text:span> ⲟⲩⲧⲟⲡⲟⲥ ⲉϥⲟⲩⲁⲁⲃ· ⲡⲏ ⲉ <text:line-break/><text:span text:style-name="T1"> </text:span><text:span text:style-name="T2">(58/32) </text:span> ⲧⲉ ⲙ̅ⲙ̅ⲛ̅ϭⲟⲙ ⲛ̅ⲧⲉⲉⲓⲛⲉ ⲛ̅ <text:line-break/><text:span text:style-name="T1"> </text:span><text:span text:style-name="T2">(58/33) </text:span> ⲧⲁϥ ⲟⲩⲱⲛ̅ϩ̅ ⲉⲃⲟⲗ ϩ̅ⲙ̅ ⲡⲕⲟⲥ <text:line-break/><text:span text:style-name="T1"> </text:span><text:span text:style-name="T2">(58/34) </text:span> ⲙⲟⲥ· ⲧⲟⲧⲉ ⲉⲃⲟⲗ ϩ̅ⲓ̅ⲧ̅ⲛ̅ ⲟⲩ <text:line-break/><text:span text:style-name="T1"> </text:span><text:span text:style-name="T2">(58/35) </text:span> ⲛⲟϭ ⲙ̅ⲙ̅ⲛ̅ⲧ̅’̅ⲙⲁⲕⲁⲣⲓⲟⲥ ⲁⲓ̈ <text:line-break/><text:span text:style-name="T1"> </text:span><text:span text:style-name="T2">(58/36) </text:span> ⲛⲁⲩ ⲉⲛⲏ ⲧⲏⲣⲟⲩ ⲉⲧⲁⲉⲓ <text:line-break/><text:span text:style-name="T1"> </text:span><text:span text:style-name="T2">(58/37) </text:span> ⲥⲱⲧ̅ⲙ̅ ⲉⲣⲟⲟⲩ ⲁⲩⲱ ⲁⲉⲓ <text:line-break/><text:span text:style-name="T1"> </text:span><text:span text:style-name="T2">(58/38) </text:span> ⲥⲙⲟⲩ ⲉⲣⲟⲟⲩ ⲧⲏⲣⲟⲩ ⲁⲓ̈ <text:line-break/><text:span text:style-name="T1"> </text:span><text:span text:style-name="T2">(59/1) </text:span> [ⲁϩⲉⲣ]ⲁⲧ’ ϩ̅ⲓ̅ϫ̅ⲛ̅ ⲧⲁⲅⲛⲱⲥⲓⲥ· ⲁ̣[ⲓ̈] <text:line-break/><text:span text:style-name="T1"> </text:span><text:span text:style-name="T2">(59/2) </text:span> [ⲕⲱⲧ]ⲉ ⲉϩⲟⲩⲛ ⲉϯⲅⲛⲱⲥⲓⲥ̣ [ⲛ̅] <text:line-break/><text:span text:style-name="T1"> </text:span><text:span text:style-name="T2">(59/3) </text:span> [ⲧⲉ] ⲛ̣ⲓⲡⲧⲏⲣ̅ϥ̅· ⲡⲓⲉⲱⲛ ⲛ̅ⲃⲁⲣⲃ[ⲏ] <text:line-break/><text:span text:style-name="T1"> </text:span><text:span text:style-name="T2">(59/4) </text:span> [ⲗⲱ·] ⲁ̣ⲩ̣ⲱ̣ ⲁ̣ⲉⲓⲛⲁⲩ ⲉϩⲉⲛϭⲟⲙ ⲉ̣[ⲩ] <text:line-break/><text:span text:style-name="T1"> </text:span><text:span text:style-name="T2">(59/5) </text:span> [ⲁⲁ]ⲃ̣ ⲉⲃⲟⲗ ϩ̅ⲓ̅ⲧⲟ̣ⲟⲧⲟⲩ ⲛ̅ⲛⲓⲫⲱ̣[ⲥ] <text:line-break/><text:span text:style-name="T1"> </text:span><text:span text:style-name="T2">(59/6) </text:span> [ⲧⲏ]ⲣ̣ ⲛ̅ⲧⲉ ϯⲃⲁⲣⲃ̣[ⲏⲗ]ⲱ ⲛ̅ϩⲟⲟⲩ[ⲧ’] <text:line-break/><text:span text:style-name="T1"> </text:span><text:span text:style-name="T2">(59/7) </text:span> ⲙ̣̅ⲡⲁⲣⲑⲉⲛⲟⲥ ⲉⲩ̣[ϫⲱ] ⲙ̅ⲙⲟ[ⲥ ⲛⲁⲓ̈] <text:line-break/><text:span text:style-name="T1"> </text:span><text:span text:style-name="T2">(59/8) </text:span> [ϫ]ⲉ ϯⲛⲁϭ̅ⲙ̅ϭⲟⲙ ⲡⲓⲣⲁⲍ̣ⲉ̣ ⲧⲁ̣ⲓ̣%9 ⲉ̣[ⲧ’] <text:line-break/><text:span text:style-name="T1"> </text:span><text:span text:style-name="T2">(59/9) </text:span> ϣⲱⲡⲉ ϩ̅ⲙ̅ ⲡⲕⲟⲥⲙⲟⲥ· ⲡⲁⲗⲗⲟ͂ <text:line-break/><text:span text:style-name="T1"> </text:span><text:span text:style-name="T2">(59/10) </text:span> [ⲅ]ⲉⲛⲏⲥ ⲉⲛⲁⲩ ⲉϯⲙ̅ⲛ̅ⲧ̅’̅ⲙⲁⲕⲁⲣⲓ <text:line-break/><text:span text:style-name="T1"> </text:span><text:span text:style-name="T2">(59/11) </text:span> ⲟ̣ⲥ ⲉⲧ̅ⲛ̅ⲧⲁⲕ ⲛ̅ⲑⲉ ⲉⲧ’ϣⲟⲟⲡ <text:line-break/><text:span text:style-name="T1"> </text:span><text:span text:style-name="T2">(59/12) </text:span> ϩ̅ⲛ̅ ⲟⲩⲥⲓⲅⲏ· ⲧⲏ ⲉⲧⲉⲕⲉⲓⲙⲉ ⲉ <text:line-break/><text:span text:style-name="T1"> </text:span><text:span text:style-name="T2">(59/13) </text:span> ⲣⲟⲕ ⲛ̅ϩⲏⲧ̅ⲥ̅ ⲕⲁⲧⲁⲣⲟⲕ· ⲁⲩⲱ ⲁⲣⲓ <text:line-break/><text:span text:style-name="T1"> </text:span><text:span text:style-name="T2">(59/14) </text:span> ⲁⲛⲁⲭⲱⲣⲓ ⲉϫ̅ⲛ̅ ϯⲙ̅ⲛⲧ’̅ⲱⲛ̅ϩ̅ <text:line-break/><text:span text:style-name="T1"> </text:span><text:span text:style-name="T2">(59/15) </text:span> ⲉⲕⲕⲱⲧⲉ ⲛ̅ⲥⲱⲕ· ⲧⲏ ⲉⲧⲉⲕⲛⲁ <text:line-break/><text:span text:style-name="T1"> </text:span><text:span text:style-name="T2">(59/16) </text:span> ⲛⲁⲩ ⲉⲣⲟⲥ ⲉⲥⲕⲓⲙ· ⲁⲩⲱ ⲉⲙ̅ⲛ̅ <text:line-break/><text:span text:style-name="T1"> </text:span><text:span text:style-name="T2">(59/17) </text:span> ϭⲁⲙ ⲛ̅ⲅ̅ⲁϩⲉⲣⲁⲧ̅ⲕ̅· ⲙ̅ⲡ̅ⲣ̅ⲣ̅ϩⲟⲧⲉ <text:line-break/><text:span text:style-name="T1"> </text:span><text:span text:style-name="T2">(59/18) </text:span> ⲗⲁⲁⲩ· ⲁⲗⲗⲁ ⲉϣⲱⲡⲉ ⲉⲕϣⲁⲛ <text:line-break/><text:span text:style-name="T1"> </text:span><text:span text:style-name="T2">(59/19) </text:span> ⲟⲩⲱϣ ⲉⲁϩⲉⲣⲁⲧ̅ⲕ̅· ⲁⲣⲓⲁⲛⲁⲭⲱ <text:line-break/><text:span text:style-name="T1"> </text:span><text:span text:style-name="T2">(59/20) </text:span> ⲣⲓ ⲉϫ̅ⲛ̅ ϯϩⲩⲡⲁⲣⲝⲓⲥ· ⲁⲩⲱ ⲉⲕⲉ <text:line-break/><text:span text:style-name="T1"> </text:span><text:span text:style-name="T2">(59/21) </text:span> ϩⲉ ⲉⲣⲟⲥ ⲉⲥⲁϩⲉⲣⲁⲧ̅ⲥ̅ ⲁⲩⲱ ⲉⲥ <text:line-break/><text:span text:style-name="T1"> </text:span><text:span text:style-name="T2">(59/22) </text:span> ϩⲟⲣ̅ⲕ̅ ⲙ̅ⲙⲟⲥ ⲕⲁⲧⲁ ⲡⲓⲛⲉ ⲙ̅ⲡⲏ <text:line-break/><text:span text:style-name="T1"> </text:span><text:span text:style-name="T2">(59/23) </text:span> ⲉⲧ’ϩⲟⲣ̅ⲕ̅ ⲙ̅ⲙⲟϥ ⲟⲛⲧⲱⲥ· <text:line-break/><text:span text:style-name="T1"> </text:span><text:span text:style-name="T2">(59/24) </text:span> ⲁⲩⲱ ⲉϥⲁⲙⲁϩⲧⲉ ⲛ̅ⲛⲁⲓ̈ ⲧⲏⲣⲟⲩ <text:line-break/><text:span text:style-name="T1"> </text:span><text:span text:style-name="T2">(59/25) </text:span> ϩ̅ⲛ̅ ⲟⲩⲕⲁⲣⲱϥ ⲙ̅ⲛ̅ ⲟⲩⲙ̅ⲛⲧ’̅ⲁ <text:line-break/><text:span text:style-name="T1"> </text:span><text:span text:style-name="T2">(59/26) </text:span> ⲧⲉⲛⲉⲣⲅⲓⲁ· ⲁⲩⲱ ⲉⲕϣⲁⲛϫⲓ ⲛ̅ <text:line-break/><text:span text:style-name="T1"> </text:span><text:span text:style-name="T2">(59/27) </text:span> ⲟⲩⲱⲛ̅ϩ̅ ⲉⲃⲟⲗ ⲛ̅ⲧⲉ ⲡⲁⲓ̈· ⲉⲃⲟⲗ <text:line-break/><text:span text:style-name="T1"> </text:span><text:span text:style-name="T2">(59/28) </text:span> ϩ̅ⲓ̅ⲧⲟⲟⲧ̅ϥ̅ ⲛ̅ⲟⲩϣⲟⲣ̅ⲡ̅ ⲛ̅ⲟⲩ <text:line-break/><text:span text:style-name="T1"> </text:span><text:span text:style-name="T2">(59/29) </text:span> ⲱⲛ̅ϩ̅ ⲉⲃⲟⲗ ⲛ̅ⲧⲉ ⲡⲓⲁⲧ’ⲥⲟⲩⲱ <text:line-break/><text:span text:style-name="T1"> </text:span><text:span text:style-name="T2">(59/30) </text:span> ⲛ̅ϥ̅· ⲡⲏ ⲉⲧⲉ ⲉϣⲱⲡⲉ ⲉⲕ <text:line-break/><text:span text:style-name="T1"> </text:span><text:span text:style-name="T2">(59/31) </text:span> ϣⲁⲛⲉⲓⲙⲉ ⲉⲣⲟϥ· ⲁⲣⲓⲁⲧ’ⲉⲓ <text:line-break/><text:span text:style-name="T1"> </text:span><text:span text:style-name="T2">(59/32) </text:span> ⲙⲉ ⲉⲣⲟϥ· ⲁⲩⲱ ⲉⲕϣⲁⲛⲣ̅ <text:line-break/><text:span text:style-name="T1"> </text:span><text:span text:style-name="T2">(59/33) </text:span> ϩⲟⲧⲉ ⲙ̅ⲡⲓⲙⲁ ⲉⲧ̅ⲙ̅ⲙⲁⲩ ⲁⲣⲓ <text:line-break/><text:span text:style-name="T1"> </text:span><text:span text:style-name="T2">(59/34) </text:span> ⲁⲛⲁⲭⲱⲣⲓ ⲉⲡⲁϩⲟⲩ ⲉⲧⲃⲉ ⲛⲓ <text:line-break/><text:span text:style-name="T1"> </text:span><text:span text:style-name="T2">(59/35) </text:span> ⲉⲛⲉⲣⲅⲓⲁ· ⲁⲩⲱ ⲉⲕϣⲁⲛⲣ̅ <text:line-break/><text:span text:style-name="T1"> </text:span><text:span text:style-name="T2">(59/36) </text:span> ⲧⲉⲗⲓⲟⲥ ⲙ̅ⲡⲓⲧⲟⲡⲟⲥ ⲉⲧ̅ⲙ̅ <text:line-break/><text:span text:style-name="T1"> </text:span><text:span text:style-name="T2">(59/37) </text:span> ⲙⲁⲩ ϩⲣⲟⲕ ⲙ̅ⲙⲟⲕ· ⲁⲩⲱ <text:line-break/><text:span text:style-name="T1"> </text:span><text:span text:style-name="T2">(59/38) </text:span> ⲕⲁⲧⲁ ⲡⲓⲧⲩⲡⲟⲥ ⲉⲧ’ϣⲟⲟⲡ <text:line-break/><text:soft-page-break/><text:span text:style-name="T1"> </text:span><text:span text:style-name="T2">(59/39) </text:span> ⲛ̅ϩⲏⲧ̅ⲕ̅· ⲉⲓⲙⲉ ⲟⲛ ⲛ̅ϯϩⲉ <text:line-break/><text:span text:style-name="T1"> </text:span><text:span text:style-name="T2">(60/1) </text:span> [ϫ]ⲉ̣ ⲉϥϣⲟⲟⲡ ⲛ̅ϯϩⲉ ϩ̅ⲛ̅ ⲛ[ⲁⲓ̈ ⲧⲏ] <text:line-break/><text:span text:style-name="T1"> </text:span><text:span text:style-name="T2">(60/2) </text:span> [ⲣⲟ]ⲩ ⲕⲁⲧⲁ ⲡⲉⲓ̈ⲥⲙⲟⲧ’· ⲁⲩ[ⲱ] <text:line-break/><text:span text:style-name="T1"> </text:span><text:span text:style-name="T2">(60/3) </text:span> [ⲙ̅ⲡ̅]̅ⲣ̅ϫⲱⲱⲣⲉ ⲉⲃⲟⲗ ⲛ̅ϩⲟⲩⲟ [ϩ̅ⲓ̅ⲛⲁ] <text:line-break/><text:span text:style-name="T1"> </text:span><text:span text:style-name="T2">(60/4) </text:span> [ϫ]ⲉ ⲉⲕⲉϭ̅ⲙ̅ϭⲟⲙ ⲛ̅ⲁϩⲉⲣⲁⲧ̅[ⲕ̅] <text:line-break/><text:span text:style-name="T1"> </text:span><text:span text:style-name="T2">(60/5) </text:span> [ⲟ]ⲩⲧⲉ ⲙ̅ⲡ̅ⲣ̅ⲟⲩⲱϣ ⲉ̣ⲣ̣̅ⲉⲛ[ⲉⲣⲅⲓ] <text:line-break/><text:span text:style-name="T1"> </text:span><text:span text:style-name="T2">(60/6) </text:span> [ϩ̅ⲓ̅]ⲛⲁ ϫⲉ ⲛⲉⲕϩⲉ̣ ⲉ̣ⲃⲟⲗ ⲡⲁⲛⲧ[ⲱⲥ] <text:line-break/><text:span text:style-name="T1"> </text:span><text:span text:style-name="T2">(60/7) </text:span> [{ϩ̅ⲓ}] ⲡⲓⲁⲧⲉⲛⲉ̣ⲣ̣ⲅ̣ⲓ̣ⲁ̣ ⲉⲧ’ϩⲣⲁⲓ̈ ⲛ̅ϩ[ⲏ] <text:line-break/><text:span text:style-name="T1"> </text:span><text:span text:style-name="T2">(60/8) </text:span> [ⲧ̅ⲕ̅] ⲛ̣̅ⲧⲉ ⲡ̣ⲓ̣[ⲁⲧ’ⲥ]ⲟⲩⲱⲛ̅ϥ̅ ⲙ̅ⲡ̅ⲣ̅ⲉ̣[ⲓ] <text:line-break/><text:span text:style-name="T1"> </text:span><text:span text:style-name="T2">(60/9) </text:span> [ⲙ]ⲉ̣ ⲉⲣⲟϥ[·] ⲡⲁⲓ̈ ⲅⲁⲣ ⲟⲩⲙ̅ⲛ̅ⲧ’ⲁⲧ’ <text:line-break/><text:span text:style-name="T1"> </text:span><text:span text:style-name="T2">(60/10) </text:span> ϭⲟⲙ ⲧⲉ· ⲁⲗⲗⲁ ⲉⲃⲟⲗ ϩ̅ⲓ̅ⲧ̅ⲛ̅ ⲟⲩ <text:line-break/><text:span text:style-name="T1"> </text:span><text:span text:style-name="T2">(60/11) </text:span> ⲉⲛⲛⲟⲓⲁ ⲉⲥⲉ ⲛ̅ⲟⲩⲟⲉⲓⲛ ⲉⲕⲓⲙ[ⲉ] <text:line-break/><text:span text:style-name="T1"> </text:span><text:span text:style-name="T2">(60/12) </text:span> ⲉⲣⲟϥ· ⲁⲣⲓⲁⲧ’ⲉⲓⲙⲉ ⲉⲣⲟϥ· ⲛⲁⲓ̣̈ <text:line-break/><text:span text:style-name="T1"> </text:span><text:span text:style-name="T2">(60/13) </text:span> ⲇⲉ ⲛⲉⲓ̈ⲥⲱⲧ̅ⲙ̅ ⲉⲣⲟⲟⲩ ⲉⲩϫⲱ ⲙ̅ <text:line-break/><text:span text:style-name="T1"> </text:span><text:span text:style-name="T2">(60/14) </text:span> ⲙⲟⲟⲩ ⲛ̅ϭⲓ ⲛⲏ ⲉⲧ̅ⲙ̅ⲙⲁⲩ· ⲛⲉϥ <text:line-break/><text:span text:style-name="T1"> </text:span><text:span text:style-name="T2">(60/15) </text:span> ϣⲟⲟⲡ ⲛ̅ϭⲓ ⲟⲩϩⲣⲟⲕ ϩⲣⲁⲓ̈ ⲛ̅ϩⲏⲧ <text:line-break/><text:span text:style-name="T1"> </text:span><text:span text:style-name="T2">(60/16) </text:span> ⲛ̅ⲧⲉ ⲟⲩⲥⲓⲅⲏ· ⲁⲉⲓⲥⲱⲧ̅ⲙ̅ ⲉϯ <text:line-break/><text:span text:style-name="T1"> </text:span><text:span text:style-name="T2">(60/17) </text:span> ⲙ̅ⲛ̅ⲧ̅’̅ⲙⲁⲕⲁⲣⲓⲟⲥ ⲧⲏ ⲉⲧⲁⲓ̈ⲉⲓⲙⲉ <text:line-break/><text:span text:style-name="T1"> </text:span><text:span text:style-name="T2">(60/18) </text:span> ⲉⲣⲟⲓ̈ ⲉⲃⲟⲗ ϩ̅ⲓ̅ⲧⲟⲟⲧ̅ⲥ̅ ⲕⲁⲧⲁⲣⲟ〈ⲓ̈〉 <text:line-break/><text:span text:style-name="T1"> </text:span><text:span text:style-name="T2">(60/19) </text:span> ⲁⲩⲱ ⲁⲉⲓⲣ̅ⲁⲛⲁⲭⲱⲣⲓ ⲉϫ̅ⲛ̅ ϯⲙ̅ⲛⲧ’̅ <text:line-break/><text:span text:style-name="T1"> </text:span><text:span text:style-name="T2">(60/20) </text:span> ⲱⲛ̅ϩ̅ ⲉⲓ̈ⲕⲱⲧⲉ ⲛ̅ⲥⲱ〈ⲓ̈〉· ⲁⲩⲱ <text:line-break/><text:span text:style-name="T1"> </text:span><text:span text:style-name="T2">(60/21) </text:span> ⲁⲉⲓⲣ̅ϣⲃⲏⲣ ⲛ̅ⲃⲱⲕ ⲉϩⲟⲩⲛ ⲉⲣⲟⲥ <text:line-break/><text:span text:style-name="T1"> </text:span><text:span text:style-name="T2">(60/22) </text:span> ⲛ̅ⲙ̅ⲙⲁⲥ· ⲁⲩⲱ ⲁⲉⲓⲁϩⲉⲣⲁⲧ’ ⲛ̅ <text:line-break/><text:span text:style-name="T1"> </text:span><text:span text:style-name="T2">(60/23) </text:span> ϩⲣⲁⲓ̈ ϩ̅ⲛ̅ ⲟⲩⲧⲁϫⲣⲟ ⲁⲛ· ⲁⲗⲗⲁ ϩ̅ⲛ̅ <text:line-break/><text:span text:style-name="T1"> </text:span><text:span text:style-name="T2">(60/24) </text:span> ⲟⲩϩⲣⲟⲕ· ⲁⲩⲱ ⲁⲓ̈ⲛⲁⲩ ⲉⲩⲕⲓⲙ· <text:line-break/><text:span text:style-name="T1"> </text:span><text:span text:style-name="T2">(60/25) </text:span> ⲛ̅ϣⲁ ⲉⲛⲉϩ ⲛ̅ⲛⲟⲉⲣⲟⲛ ⲛ̅ⲁⲧ <text:line-break/><text:span text:style-name="T1"> </text:span><text:span text:style-name="T2">(60/26) </text:span> ⲡⲱⲣ̅ϫ̅· ⲉⲡⲁⲛⲓϭⲟⲙ ⲧⲏⲣⲟⲩ ⲡⲉ <text:line-break/><text:span text:style-name="T1"> </text:span><text:span text:style-name="T2">(60/27) </text:span> ⲛ̅ⲛⲁⲧ’ⲉⲓⲇⲟⲥ ⲛ̅ⲛⲁⲧ’ϯ ⲧⲟϣ <text:line-break/><text:span text:style-name="T1"> </text:span><text:span text:style-name="T2">(60/28) </text:span> ⲉⲣⲟϥ ϩ̅ⲛ̅ ⲟⲩϯ ⲧⲟϣ· ⲁⲩⲱ ⲉ <text:line-break/><text:span text:style-name="T1"> </text:span><text:span text:style-name="T2">(60/29) </text:span> ⲧⲁⲉⲓⲟⲩⲱϣ ⲉⲁϩⲉⲣⲁⲧ’ ϩ̅ⲛ̅ ⲟⲩ <text:line-break/><text:span text:style-name="T1"> </text:span><text:span text:style-name="T2">(60/30) </text:span> ⲧⲁϫⲣⲟ· ⲁⲉⲓⲣ̅ⲁⲛⲁⲭⲱⲣⲓ ⲉϫ̅ⲛ̅ <text:line-break/><text:span text:style-name="T1"> </text:span><text:span text:style-name="T2">(60/31) </text:span> ϯϩⲩⲡⲁⲣⲝⲓⲥ ⲧⲏ ⲉⲧⲁⲉⲓϭ̅ⲛ̅ⲧ̅ⲥ̅ <text:line-break/><text:span text:style-name="T1"> </text:span><text:span text:style-name="T2">(60/32) </text:span> ⲉⲥⲁϩⲉⲣⲁⲧ̅ⲥ̅· ⲁⲩⲱ ⲉⲥϩⲟⲣ̅ⲕ̅ <text:line-break/><text:span text:style-name="T1"> </text:span><text:span text:style-name="T2">(60/33) </text:span> ⲙ̅ⲙⲟⲥ ⲕⲁⲧⲁ ⲟⲩϩ̅ⲓ̅ⲕⲱⲛ ⲙ̅ⲛ̅ <text:line-break/><text:span text:style-name="T1"> </text:span><text:span text:style-name="T2">(60/34) </text:span> ⲟⲩⲉⲓⲛⲉ ⲛ̅ⲧⲉ ⲡⲏ ⲉⲧ’ⲧⲟⲉ ϩ̅ⲓ̅ⲱ <text:line-break/><text:span text:style-name="T1"> </text:span><text:span text:style-name="T2">(60/35) </text:span> ⲱⲧ’· ⲉⲃⲟⲗ ϩ̅ⲓ̅ⲧ̅ⲛ̅ ⲟⲩⲱⲛ̅ϩ̅ ⲉⲃⲟⲗ <text:line-break/><text:span text:style-name="T1"> </text:span><text:span text:style-name="T2">(60/36) </text:span> ⲛ̅ⲧⲉ ⲡⲓⲁⲧ’ⲡⲱϣ ⲙ̅ⲛ̅ ⲡⲏ ⲉⲧ’ <text:line-break/><text:span text:style-name="T1"> </text:span><text:span text:style-name="T2">(60/37) </text:span> ϩⲟⲣ̅ⲕ̅ ⲙ̅ⲙⲟϥ· ⲁⲉⲓⲙⲟⲩϩ ⲉⲃⲟⲗ <text:line-break/><text:span text:style-name="T1"> </text:span><text:span text:style-name="T2">(60/38) </text:span> ϩ̅ⲛ̅ ⲟⲩⲱⲛ̅ϩ̅ ⲉⲃⲟⲗ· ⲉⲃⲟⲗ ϩ̅ⲓ̅ <text:line-break/><text:span text:style-name="T1"> </text:span><text:span text:style-name="T2">(60/39) </text:span> ⲧ̅ⲛ̅ ⲟⲩⲙ̅ⲛⲧ’̅ϣⲟⲣ̅ⲡ̅ ⲛ̅ⲟⲩⲱⲛ̅ϩ̅ <text:line-break/><text:span text:style-name="T1"> </text:span><text:span text:style-name="T2">(61/1) </text:span> ⲉⲃⲟⲗ ⲙ̅ⲡⲓⲁⲧ’ⲥⲟⲩⲱⲛ̅ϥ̅· ϩ̣[ⲱⲥ] <text:line-break/><text:span text:style-name="T1"> </text:span><text:span text:style-name="T2">(61/2) </text:span> ⲉⲓ̈ⲉ ⲛ̅ⲛⲁⲧ’ⲉⲓⲙⲉ ⲉⲣⲟϥ· ⲁⲓ̈ⲉⲓ̣[ⲙⲉ] <text:line-break/><text:span text:style-name="T1"> </text:span><text:span text:style-name="T2">(61/3) </text:span> ⲉⲣⲟϥ ⲁⲩⲱ ⲁⲉⲓϫⲓ ϭⲟⲙ ϩⲣⲁⲓ̈ ⲛ̣̅ <text:line-break/><text:span text:style-name="T1"> </text:span><text:span text:style-name="T2">(61/4) </text:span> [ϩ]ⲏ̣ⲧ̅ϥ̅· ⲉⲁⲉⲓϫⲓ ⲛ̅ⲟⲩϫⲣⲟ ⲛ̅ϩⲏⲧ̣ <text:line-break/><text:span text:style-name="T1"> </text:span><text:span text:style-name="T2">(61/5) </text:span> [ⲛ̅]ϣⲁ ⲉⲛⲉϩ· ⲁⲉⲓⲥⲟⲩⲱⲛ ⲡⲏ ⲉ̣[ⲧ’] <text:line-break/><text:span text:style-name="T1"> </text:span><text:span text:style-name="T2">(61/6) </text:span> [ϣ]ⲟⲟⲡ ⲛ̅ϩⲏⲧ’ ⲙ̅ⲛ̅ ⲡⲓϣ̅ⲙⲧ’̅ϭⲟ̣[ⲙ] <text:line-break/><text:span text:style-name="T1"> </text:span><text:span text:style-name="T2">(61/7) </text:span> ⲙ̣̅̅ⲛ̅ ⲡⲓⲟⲩⲱⲛ̅ϩ̅ ⲉ̣[ⲃⲟ]ⲗ̣ ⲛ̅ⲧⲉ ⲡ̣[ⲓ] <text:line-break/><text:soft-page-break/><text:span text:style-name="T1"> </text:span><text:span text:style-name="T2">(61/8) </text:span> ⲁ̣ⲧ’ϣⲱⲡ ⲉⲣⲟϥ ⲉ̣[ⲧ̅ⲛ̅]ⲧ̣ⲁϥ· ⲁ[ⲩⲱ] <text:line-break/><text:span text:style-name="T1"> </text:span><text:span text:style-name="T2">(61/9) </text:span> ⲉⲃⲟⲗ ϩ̅ⲓ̅ⲧ̅ⲛ̣̅ ⲟⲩⲙ̅ⲛ̅ⲧ’ϣⲟⲣ̅ⲡ̅ ⲛ̅[ⲟⲩ] <text:line-break/><text:span text:style-name="T1"> </text:span><text:span text:style-name="T2">(61/10) </text:span> ⲱⲛ̅ϩ̅ ⲉⲃⲟⲗ ⲛ̅ⲧⲉ ⲡⲓϣⲟⲣ̅ⲡ̅ ⲛ̅ⲁⲧ’̣ <text:line-break/><text:span text:style-name="T1"> </text:span><text:span text:style-name="T2">(61/11) </text:span> [ⲥ]ⲟⲩⲱⲛ̅ϥ̅ ⲛⲁⲩ ⲧⲏⲣⲟⲩ· ⲡⲛⲟⲩ <text:line-break/><text:span text:style-name="T1"> </text:span><text:span text:style-name="T2">(61/12) </text:span> ⲧⲉ ⲉⲧ’ϫⲟⲥⲉ ⲉⲧⲉⲗⲓⲟⲥ ⲁⲓ̈ⲛⲁⲩ <text:line-break/><text:span text:style-name="T1"> </text:span><text:span text:style-name="T2">(61/13) </text:span> ⲉⲣⲟϥ ⲙ̅ⲛ̅ ⲡⲓϣ̅ⲙ̅ⲧ’ϭⲟⲙ ⲉⲧ’ϣⲟ <text:line-break/><text:span text:style-name="T1"> </text:span><text:span text:style-name="T2">(61/14) </text:span> ⲟⲡ ⲛ̅ϩⲏⲧⲟⲩ ⲧⲏⲣⲟⲩ· ⲛⲉⲓ̈ⲕⲱ <text:line-break/><text:span text:style-name="T1"> </text:span><text:span text:style-name="T2">(61/15) </text:span> ⲧⲉ ⲛ̅ⲥⲁ ⲡⲛⲟⲩⲧⲉ ⲛ̅ⲛⲁⲧ’ϣⲁϫⲉ <text:line-break/><text:span text:style-name="T1"> </text:span><text:span text:style-name="T2">(61/16) </text:span> ⲙ̅ⲙⲟϥ ⲙ̅ⲛ̅ ⲡⲓⲁⲧ’ⲥⲟⲩⲱⲛ̅ϥ̅· <text:line-break/><text:span text:style-name="T1"> </text:span><text:span text:style-name="T2">(61/17) </text:span> ⲡⲁⲓ̈ ⲉⲧⲉ ⲉϣⲱⲡⲉ ⲉⲣϣⲁⲛⲟⲩⲁ <text:line-break/><text:span text:style-name="T1"> </text:span><text:span text:style-name="T2">(61/18) </text:span> ⲉⲓⲙⲉ ⲉⲣⲟϥ ⲡⲁⲛⲧⲱⲥ ϣⲁϥⲣ̅ⲁⲧ’ <text:line-break/><text:span text:style-name="T1"> </text:span><text:span text:style-name="T2">(61/19) </text:span> ⲉⲓⲙⲉ ⲉⲣⲟϥ· ⲡⲓⲙⲉⲥⲓⲧⲏⲥ ⲛ̅ⲧⲉ <text:line-break/><text:span text:style-name="T1"> </text:span><text:span text:style-name="T2">(61/20) </text:span> ⲡⲓϣⲙ̅ⲛ̅ⲧ̅’̅ϭⲟⲙ ⲡⲏ ⲉⲧ’ⲕⲏ ϩ̅ⲛ̅ ⲟⲩ <text:line-break/><text:span text:style-name="T1"> </text:span><text:span text:style-name="T2">(61/21) </text:span> ϩⲣⲟⲕ ⲙ̅ⲛ̅ ⲟⲩⲕⲟⲣⲱϥ· ⲁⲩⲱ ⲉϥⲉ <text:line-break/><text:span text:style-name="T1"> </text:span><text:span text:style-name="T2">(61/22) </text:span> ⲛ̅ⲛⲁⲧ’ⲥⲟⲩⲱⲛ̅ϥ̅· ⲛⲁⲓ̈ ⲇⲉ ⲉⲓ̈ⲧⲁ <text:line-break/><text:span text:style-name="T1"> </text:span><text:span text:style-name="T2">(61/23) </text:span> ϫⲣⲏⲩ ⲛ̅ϩⲏⲧⲟⲩ· ⲡⲉϫⲁⲩ ⲛⲁⲓ̈ ⲛ̅ <text:line-break/><text:span text:style-name="T1"> </text:span><text:span text:style-name="T2">(61/24) </text:span> ϭⲓ ⲛⲓϭⲟⲙ ⲛ̅ⲧⲉ ⲛⲓⲫⲱⲥⲧⲏⲣ ϫⲉ <text:line-break/><text:span text:style-name="T1"> </text:span><text:span text:style-name="T2">(61/25) </text:span> ϩⲱ ϭⲉ ⲉⲕϫⲱⲱⲣⲉ ⲉⲃⲟⲗ ⲙ̅ⲡⲓⲁ <text:line-break/><text:span text:style-name="T1"> </text:span><text:span text:style-name="T2">(61/26) </text:span> ⲧⲉⲛⲉⲣⲅⲓⲁ ⲉⲧ’ϣⲟⲟⲡ ⲛ̅ϩⲏⲧ̅ⲕ̅ <text:line-break/><text:span text:style-name="T1"> </text:span><text:span text:style-name="T2">(61/27) </text:span> ⲉⲃⲟⲗ ϩ̅ⲓ̅ⲧⲟⲟⲧ̅ϥ̅ ⲙ̅ⲡⲓⲕⲱⲧⲉ ⲛ̅ <text:line-break/><text:span text:style-name="T1"> </text:span><text:span text:style-name="T2">(61/28) </text:span> ⲧⲉ ⲛⲓⲁⲧ’ⲧⲁϩⲟⲟⲩ· ⲁⲗⲗⲁ ⲥⲱⲧ̅ⲙ̅ <text:line-break/><text:span text:style-name="T1"> </text:span><text:span text:style-name="T2">(61/29) </text:span> ⲉⲧⲃⲏⲏⲧ̅ϥ̅ ⲕⲁⲧⲁ ⲑⲉ ⲉⲧⲉ ⲟⲩⲛ̅ <text:line-break/><text:span text:style-name="T1"> </text:span><text:span text:style-name="T2">(61/30) </text:span> ϭⲟⲙ ⲉⲃⲟⲗ ϩ̅ⲓ̅ⲧ̅ⲛ̅ ⲟⲩⲙ̅ⲛⲧ’̅ϣⲟ <text:line-break/><text:span text:style-name="T1"> </text:span><text:span text:style-name="T2">(61/31) </text:span> ⲣ̅ⲡ̅ ⲛ̅ⲟⲩⲱⲛ̅ϩ̅ ⲉⲃⲟⲗ ⲙ̅ⲛ̅ ⲟⲩⲱ <text:line-break/><text:span text:style-name="T1"> </text:span><text:span text:style-name="T2">(61/32) </text:span> ⲛ̅ϩ̅ ⲉⲃⲟⲗ· ϥϣⲟⲟⲡ ⲇⲉ ⲛ̅ⲛⲟⲩ <text:line-break/><text:span text:style-name="T1"> </text:span><text:span text:style-name="T2">(61/33) </text:span> ⲗⲁⲁⲩ ⲛ̅ⲑⲉ ⲉⲧⲉϥϣⲟⲟⲡ· ⲏ%0 ϫⲉ <text:line-break/><text:span text:style-name="T1"> </text:span><text:span text:style-name="T2">(61/34) </text:span> ϥϣⲟⲟⲡ ⲁⲩⲱ ⲉϥⲛⲁϣⲱⲡⲉ <text:line-break/><text:span text:style-name="T1"> </text:span><text:span text:style-name="T2">(61/35) </text:span> ⲏ%0 ⲉϥⲣ̅ⲉⲛⲉⲣⲅⲓ ⲏ%0 ⲉϥⲉⲓⲙⲉ ⲉϥⲟ <text:line-break/><text:span text:style-name="T1"> </text:span><text:span text:style-name="T2">(61/36) </text:span> ⲛ̅ϩ̅ ⲉⲙ̅ⲛ̅ⲧⲁϥ ⲛ̅ⲛⲟⲩⲛⲟⲩⲥ· <text:line-break/><text:span text:style-name="T1"> </text:span><text:span text:style-name="T2">(61/37) </text:span> ⲟⲩⲧⲉ ⲟⲩⲱⲛ̅ϩ̅· ⲟⲩⲧⲉ ⲟⲩϩⲩ <text:line-break/><text:span text:style-name="T1"> </text:span><text:span text:style-name="T2">(61/38) </text:span> ⲡⲁⲣⲝⲓⲥ· ⲟⲩⲧⲉ ⲡⲓⲁⲧ’ϩⲩⲡⲁⲣ <text:line-break/><text:span text:style-name="T1"> </text:span><text:span text:style-name="T2">(61/39) </text:span> ⲝⲓⲥ ϩ̅ⲛ̅ ⲟⲩⲙ̅ⲛⲧ’̅ⲁⲧ’ⲧⲁϩⲟⲥ· <text:line-break/><text:span text:style-name="T1"> </text:span><text:span text:style-name="T2">(62/1) </text:span> [ⲁ]ⲩ̣ⲱ ⲉϥϣⲟⲟⲡ ⲛ̅ⲛⲟⲩⲗⲁⲁⲩ ⲙ̅ⲛ̅ <text:line-break/><text:span text:style-name="T1"> </text:span><text:span text:style-name="T2">(62/2) </text:span> [ⲡ]ⲏ̣ ⲉⲧ’ϣⲟⲟⲡ ⲉⲧ̅ⲛ̅ⲧⲁϥ· ⲟⲩⲧⲉ <text:line-break/><text:span text:style-name="T1"> </text:span><text:span text:style-name="T2">(62/3) </text:span> [ⲉ]ⲛ̣ⲥⲉϣⲱϫ̅ⲡ̅ ⲙ̅ⲙⲟϥ ⲁⲛ ⲕⲁⲧⲁ <text:line-break/><text:span text:style-name="T1"> </text:span><text:span text:style-name="T2">(62/4) </text:span> [ⲗ]ⲁ̣ⲁⲩ ⲛ̅ⲥⲙⲟⲧ’· ϩⲱⲥ ⲉϥϯ ⲛ̅ⲟ̣[ⲩ] <text:line-break/><text:span text:style-name="T1"> </text:span><text:span text:style-name="T2">(62/5) </text:span> [ⲗ]ⲁ̣ⲁⲩ ⲉϥϫⲟⲛ̅ⲧ̅’̅· ⲏ%0 ⲉϥⲧ̅ⲃ̣̅ⲃⲟ̣ [ⲏ%0] <text:line-break/><text:span text:style-name="T1"> </text:span><text:span text:style-name="T2">(62/6) </text:span> [ⲉ]ϥϫⲓ ⲏ%0 ⲉϥϯ· ⲟⲩⲧⲉ ⲉⲙⲉⲩ <text:line-break/><text:span text:style-name="T1"> </text:span><text:span text:style-name="T2">(62/7) </text:span> [ϣⲁ]ϫϩ̅ϥ̅ ⲕⲁ̣[ⲧⲁ] ⲗ̣ⲁⲁⲩ ⲛ̅ⲥⲙⲟⲧ’ <text:line-break/><text:span text:style-name="T1"> </text:span><text:span text:style-name="T2">(62/8) </text:span> [ⲏ%0 ⲉ]ⲃⲟⲗ ϩ̅ⲓ̣̅̅[ⲧ̅ⲛ̅] ⲡⲉϥⲟⲩⲱϣⲉ ⲟⲩⲁ <text:line-break/><text:span text:style-name="T1"> </text:span><text:span text:style-name="T2">(62/9) </text:span> ⲁ̣ϥ ⲏ%0 ⲉϥϯ· ⲏ%0 ⲉϥϫⲓ ⲉⲃⲟⲗ ϩ̅ⲓ̅ⲧⲟ <text:line-break/><text:span text:style-name="T1"> </text:span><text:span text:style-name="T2">(62/10) </text:span> ⲟⲧ̅ϥ̅ ⲛ̅ⲕⲉⲟⲩⲁ· ⲟⲩⲧⲉ ⲙ̅ⲙ̅ⲛ̅ⲧⲁϥ <text:line-break/><text:span text:style-name="T1"> </text:span><text:span text:style-name="T2">(62/11) </text:span> ⲗⲁⲁⲩ ⲛ̅ⲟⲩⲱϣⲉ ⲉⲃⲟⲗ ⲙ̅ⲙⲟϥ̣ <text:line-break/><text:span text:style-name="T1"> </text:span><text:span text:style-name="T2">(62/12) </text:span> ⲟⲩⲁⲁϥ· ⲟⲩⲧⲉ ⲉⲃⲟⲗ ϩ̅ⲓ̅ⲧ̅ⲛ̅ ⲕⲉ <text:line-break/><text:span text:style-name="T1"> </text:span><text:span text:style-name="T2">(62/13) </text:span> ⲟⲩⲁ· ⲛ̅ⲛⲉϣⲁϥⲉ̅ⲓ̅ ⲁⲛ ⲉϩⲣⲁⲓ̈ ⲉ <text:line-break/><text:span text:style-name="T1"> </text:span><text:span text:style-name="T2">(62/14) </text:span> ⲣⲟϥ· ⲁⲗⲗⲁ ⲟⲩⲧⲉ ⲛ̅ⲧⲟϥ ⲛ̅ϥ̅ϯ <text:line-break/><text:span text:style-name="T1"> </text:span><text:span text:style-name="T2">(62/15) </text:span> ⲛ̅ⲛⲟⲩⲗⲁⲁⲩ ⲁⲛ ⲉⲃⲟⲗ ϩ̅ⲓ̅ⲧⲟⲟⲧ̅ϥ̅ <text:line-break/><text:soft-page-break/><text:span text:style-name="T1"> </text:span><text:span text:style-name="T2">(62/16) </text:span> ϩ̅ⲓ̅ⲛⲁ ϫⲉ ⲛⲉϥϣⲱⲡⲉ ⲉⲩϣⲱϫ̅ϩ̅ <text:line-break/><text:span text:style-name="T1"> </text:span><text:span text:style-name="T2">(62/17) </text:span> ⲙ̅ⲙⲟϥ ⲕⲁⲧⲁ ⲕⲉⲥⲙⲟⲧ’· ⲉⲧⲃⲉ <text:line-break/><text:span text:style-name="T1"> </text:span><text:span text:style-name="T2">(62/18) </text:span> ⲡⲁⲓ̈ ⲟⲩⲧⲉ ⲙⲁϥⲣ̅ ⲭⲣⲓⲁ ⲛ̅ⲛⲟⲩ <text:line-break/><text:span text:style-name="T1"> </text:span><text:span text:style-name="T2">(62/19) </text:span> ⲛⲟⲩⲥ ⲟⲩⲧⲉ ⲟⲩⲱⲛ̅ϩ̅· ⲟⲩⲧⲉ ⲗⲁ <text:line-break/><text:span text:style-name="T1"> </text:span><text:span text:style-name="T2">(62/20) </text:span> ⲁⲩ ⲣⲱ ⲉⲡⲧⲏⲣ̅ϥ̅· ⲉϥⲥⲟⲧ̅ⲡ̅ ⲉⲛⲓ <text:line-break/><text:span text:style-name="T1"> </text:span><text:span text:style-name="T2">(62/21) </text:span> ⲡⲧⲏⲣ̅ϥ̅ ϩ̅ⲛ̅ ϯⲙ̅ⲛⲧ’̅ⲣ̅ϩⲁⲉ ⲉⲧ̅ⲛ̅ⲧⲁϥ̣ <text:line-break/><text:span text:style-name="T1"> </text:span><text:span text:style-name="T2">(62/22) </text:span> ⲙ̅ⲛ̅ ϯⲙ̅ⲛⲧ’̅ⲁⲧ’ⲥⲟⲩⲱⲛ̅ⲥ̅· ⲉⲧⲉ <text:line-break/><text:span text:style-name="T1"> </text:span><text:span text:style-name="T2">(62/23) </text:span> ⲧⲁⲓ̈ ⲧⲉ ϯϩⲩⲡⲁⲣⲝⲓⲥ ⲛ̅ⲛⲁⲧ’ϣⲱ <text:line-break/><text:span text:style-name="T1"> </text:span><text:span text:style-name="T2">(62/24) </text:span> ⲡⲉ· ⲉⲡⲓⲇⲏ ⲟⲩⲛ̅ⲧⲁϥ ⲙ̅ⲙⲁⲩ ⲛ̅ <text:line-break/><text:span text:style-name="T1"> </text:span><text:span text:style-name="T2">(62/25) </text:span> ⲟⲩⲥⲓⲅⲏ ⲙ̅ⲛ̅ ⲟⲩϩⲣⲟⲕ· ϩ̅ⲓ̅ⲛⲁ ϫⲉ <text:line-break/><text:span text:style-name="T1"> </text:span><text:span text:style-name="T2">(62/26) </text:span> ⲛⲉⲩϣⲁϩϫ̅ϥ̅ ⲉⲃⲟⲗ ϩ̅ⲓ̅ⲧⲟⲟⲧⲟⲩ <text:line-break/><text:span text:style-name="T1"> </text:span><text:span text:style-name="T2">(62/27) </text:span> ⲛ̅ⲛⲏ ⲉⲧⲉ ⲙⲉⲩϣⲁϩϫⲟⲩ· ⲟⲩ <text:line-break/><text:span text:style-name="T1"> </text:span><text:span text:style-name="T2">(62/28) </text:span> ⲧⲉ ⲛ̅ⲛⲟⲩⲙ̅ⲛ̅ⲧ̅’̅ⲛⲟⲩⲧⲉ ⲁⲛ ⲡⲉ <text:line-break/><text:span text:style-name="T1"> </text:span><text:span text:style-name="T2">(62/29) </text:span> ⲟⲩⲧⲉ ⲟⲩⲙ̅ⲛ̅ⲧ̅’̅ⲙⲁⲕⲁⲣⲓⲟⲥ <text:line-break/><text:span text:style-name="T1"> </text:span><text:span text:style-name="T2">(62/30) </text:span> ⲟⲩⲧⲉ ⲟⲩⲙ̅ⲛ̅ⲧ̅’̅ⲧⲉⲗⲓⲟⲥ· ⲁⲗⲗⲁ <text:line-break/><text:span text:style-name="T1"> </text:span><text:span text:style-name="T2">(62/31) </text:span> ⲟⲩⲗⲁⲁⲩ ⲛ̅ⲧⲁϥ ⲡⲉ ⲛ̅ⲛⲁⲧ’ⲥⲟⲩ <text:line-break/><text:span text:style-name="T1"> </text:span><text:span text:style-name="T2">(62/32) </text:span> ⲱⲛ̅ϥ̅ ⲙ̅ⲡⲏ ⲁⲛ ⲉⲧ̅ⲛ̅ⲧⲁϥ· ⲁⲗ <text:line-break/><text:span text:style-name="T1"> </text:span><text:span text:style-name="T2">(62/33) </text:span> ⲗⲁ ⲉⲕⲉⲟⲩⲁ ⲛ̅ⲧⲟϥ ⲡⲉ ⲉϥⲥⲟ <text:line-break/><text:span text:style-name="T1"> </text:span><text:span text:style-name="T2">(62/34) </text:span> ⲧ̅ⲡ̅ ⲉϯⲙ̅ⲛⲧ’̅ⲙⲁⲕⲁⲣⲓⲟⲥ ⲙ̅ⲛ̅ <text:line-break/><text:span text:style-name="T1"> </text:span><text:span text:style-name="T2">(62/35) </text:span> ϯⲙ̅ⲛ̅ⲧ̅’̅ⲛⲟⲩⲧⲉ ⲙ̅ⲛ̅ ⲟⲩⲙ̅ⲛⲧ̅ <text:line-break/><text:span text:style-name="T1"> </text:span><text:span text:style-name="T2">(62/36) </text:span> ⲧⲉⲗⲓⲟⲥ· ⲟⲩⲧⲉ ⲅⲁⲣ ⲛ̅ⲛⲟⲩ <text:line-break/><text:span text:style-name="T1"> </text:span><text:span text:style-name="T2">(62/37) </text:span> ⲧⲉⲗⲓⲟⲥ ⲁⲛ ⲡⲉ· ⲁⲗⲗⲁ ⲉⲕⲉⲛ̅ <text:line-break/><text:span text:style-name="T1"> </text:span><text:span text:style-name="T2">(63/1) </text:span> ⲕⲁ ⲡⲉ ⲉϥⲥⲟⲧ̅ⲡ̅· ⲟⲩⲧⲉ ⲛ̅[ⲛⲟⲩ] <text:line-break/><text:span text:style-name="T1"> </text:span><text:span text:style-name="T2">(63/2) </text:span> [ⲁ]ⲧ̅ⲛ̅ⲁⲣⲏϫ̅ϥ̅ ⲁⲛ ⲡⲉ· ⲟⲩⲧⲉ ⲛ̅[ⲥⲉ] <text:line-break/><text:span text:style-name="T1"> </text:span><text:span text:style-name="T2">(63/3) </text:span> ϯ ⲧⲟϣ ⲉⲣⲟϥ ⲁⲛ ⲉⲃⲟⲗ ϩ̅ⲓ̅ⲧⲟⲟ[[ⲧ̅ϥ̅] <text:line-break/><text:span text:style-name="T1"> </text:span><text:span text:style-name="T2">(63/4) </text:span> [ⲛ̅ⲕ]ⲉⲟⲩⲁ· ⲁⲗⲗⲁ ⲉⲩⲛ̅ⲕⲁ ⲉϥⲥⲟ̣‐ <text:line-break/><text:span text:style-name="T1"> </text:span><text:span text:style-name="T2">(63/5) </text:span> ⲧ̣ⲡ̣̅ ⲡⲉ· ⲛ̅ⲛⲟⲩⲥⲱ̣ⲙⲁ ⲁⲛ ⲡⲉ̣ [ⲛ̅] <text:line-break/><text:span text:style-name="T1"> </text:span><text:span text:style-name="T2">(63/6) </text:span> ⲛⲟⲩⲁⲧⲥⲱⲙⲁ ⲁ[ⲛ] ⲡ̣ⲉ· ⲛ̅[ⲛⲟⲩ] <text:line-break/><text:span text:style-name="T1"> </text:span><text:span text:style-name="T2">(63/7) </text:span> ⲛⲟϭ ⲁⲛ ⲡⲉ ⲛ̅ⲛⲟⲩ[ⲕⲟ]ⲩⲉⲓ̣ [ⲁⲛ ⲡⲉ] <text:line-break/><text:span text:style-name="T1"> </text:span><text:span text:style-name="T2">(63/8) </text:span> ⲛ̅ⲛⲟⲩⲏⲡⲉ ⲁⲛ ⲡⲉ ⲛ̣̅ⲛⲟⲩⲧ̣ⲁ[ⲙⲓⲟ] <text:line-break/><text:span text:style-name="T1"> </text:span><text:span text:style-name="T2">(63/9) </text:span> ⲁⲛ ⲡⲉ· ⲟⲩⲧⲉ ⲛ̅ⲛⲟⲩⲗⲁⲁⲩ ⲁⲛ <text:line-break/><text:span text:style-name="T1"> </text:span><text:span text:style-name="T2">(63/10) </text:span> ⲡⲉ ⲉϥϣⲟⲟⲡ· ⲡⲁⲓ̈ ⲉⲧⲉ ⲟⲩⲛ̅ϭⲟⲙ <text:line-break/><text:span text:style-name="T1"> </text:span><text:span text:style-name="T2">(63/11) </text:span> [ⲛ̅]ⲧ̣ⲉⲟⲩⲁ ⲉⲓⲙⲉ ⲉⲣⲟϥ· ⲁⲗⲗⲁ ⲉⲕⲉ <text:line-break/><text:span text:style-name="T1"> </text:span><text:span text:style-name="T2">(63/12) </text:span> [ⲗⲁ]ⲁ̣ⲩ ⲛ̅ⲧⲁϥ ⲡⲉ ⲉϥⲥⲟⲧ̅ⲡ̅· ⲡⲏ ⲉ <text:line-break/><text:span text:style-name="T1"> </text:span><text:span text:style-name="T2">(63/13) </text:span> [ⲧ]ⲉ ⲙ̅ⲙ̅ⲛ̅ϭⲟⲙ ⲛ̅ⲧⲉⲟⲩⲁ ⲉⲓⲙⲉ <text:line-break/><text:span text:style-name="T1"> </text:span><text:span text:style-name="T2">(63/14) </text:span> [ⲉ]ⲣⲟϥ· ⲉⲩϣⲟⲣ̅ⲡ̅ ⲛ̅ⲟⲩⲱⲛ̅ϩ̅ ⲉ <text:line-break/><text:span text:style-name="T1"> </text:span><text:span text:style-name="T2">(63/15) </text:span> ⲃ̣ⲟⲗ ⲡⲉ ⲙ̅ⲛ̅ ⲟⲩⲅⲛⲱⲥⲓⲥ ⲛ̅ⲧⲁϥ <text:line-break/><text:span text:style-name="T1"> </text:span><text:span text:style-name="T2">(63/16) </text:span> ⲉⲛⲧⲟϥ ⲟⲩⲁⲁϥ ⲉⲧ’ⲉⲓⲙⲉ ⲉⲣⲟϥ· <text:line-break/><text:span text:style-name="T1"> </text:span><text:span text:style-name="T2">(63/17) </text:span> ⲉⲡⲓⲇⲏ ⲛ̅ⲗⲁⲁⲩ ⲁ[ⲛ] ⲡⲉ ⲛ̅ⲧⲉ ⲛⲏ <text:line-break/><text:span text:style-name="T1"> </text:span><text:span text:style-name="T2">(63/18) </text:span> ⲉⲧ’ϣⲟⲟⲡ· ⲁⲗⲗⲁ ⲉⲕⲉⲛ̅ⲕⲁ ⲡⲉ <text:line-break/><text:span text:style-name="T1"> </text:span><text:span text:style-name="T2">(63/19) </text:span> ⲉϥⲥⲟⲧ̅ⲡ̅ ⲛ̅ⲧⲉ ⲛⲏ ⲉⲧ’ⲥⲟⲧ̅ⲡ̅· <text:line-break/><text:span text:style-name="T1"> </text:span><text:span text:style-name="T2">(63/20) </text:span> ⲁⲗⲗⲁ ⲛ̅ⲑⲉ ⲙ̅ⲡⲏ ⲉⲧ̅ⲛ̅ⲧⲁϥ· ⲁⲩⲱ <text:line-break/><text:span text:style-name="T1"> </text:span><text:span text:style-name="T2">(63/21) </text:span> ⲙ̅ⲡⲏ ⲁⲛ ⲉⲧ̅ⲛ̅ⲧⲁϥ· ⲟⲩⲧⲉ ⲉϥϫⲓ <text:line-break/><text:span text:style-name="T1"> </text:span><text:span text:style-name="T2">(63/22) </text:span> ⲁⲛ ⲉⲃⲟⲗ ϩ̅ⲛ̅ ⲟⲩⲉⲱⲛ· ⲟⲩⲧⲉ <text:line-break/><text:span text:style-name="T1"> </text:span><text:span text:style-name="T2">(63/23) </text:span> ⲉϥϫⲓ ⲁⲛ ⲉⲃⲟⲗ ϩ̅ⲛ̅ ⲟⲩⲭⲣⲟⲛⲟⲥ· <text:line-break/><text:span text:style-name="T1"> </text:span><text:span text:style-name="T2">(63/24) </text:span> ⲟⲩⲧⲉ ⲉⲙⲉϥϫⲓ ⲗⲁⲁⲩ ⲉⲃⲟⲗ ϩ̅ⲓ̅ <text:line-break/><text:span text:style-name="T1"> </text:span><text:span text:style-name="T2">(63/25) </text:span> ⲧ̅ⲛ̅ ⲕⲉⲟⲩⲁ· ⲟⲩⲧⲉ ⲉⲛⲥⲉϣⲱ <text:line-break/><text:soft-page-break/><text:span text:style-name="T1"> </text:span><text:span text:style-name="T2">(63/26) </text:span> ϫ̅ϩ̅ ⲙ̅ⲙⲟϥ ⲁⲛ· ⲟⲩⲧⲉ ⲉϥϣⲱϫ̅ϩ̅ <text:line-break/><text:span text:style-name="T1"> </text:span><text:span text:style-name="T2">(63/27) </text:span> ⲛ̅ⲗⲁⲁⲩ ⲁⲛ· ⲟⲩⲧⲉ ⲛ̅ⲛⲟⲩⲁⲧ’ϣⲁ <text:line-break/><text:span text:style-name="T1"> </text:span><text:span text:style-name="T2">(63/28) </text:span> ϫϩ̅ϥ̅ ⲁⲛ ⲡⲉ· ⲡⲁⲓ̈ ⲇⲉ ⲟⲩⲧⲉϩⲟ <text:line-break/><text:span text:style-name="T1"> </text:span><text:span text:style-name="T2">(63/29) </text:span> ⲛ̅ⲧⲁϥ ⲟⲩⲁⲁϥ ⲡⲉ· ϩⲱⲥ ⲉⲩⲗⲁ <text:line-break/><text:span text:style-name="T1"> </text:span><text:span text:style-name="T2">(63/30) </text:span> ⲁⲩ ⲛ̅ϯϩⲉ ⲡⲉ ⲛ̅ⲛⲁⲧ’ⲥⲟⲩⲱⲛ̅ϥ̅· <text:line-break/><text:span text:style-name="T1"> </text:span><text:span text:style-name="T2">(63/31) </text:span> ϩⲱⲥ ⲉϥⲥⲟⲧ̅ⲡ̅ ⲉⲛⲏ ⲉⲧⲛⲁⲛⲟⲩ <text:line-break/><text:span text:style-name="T1"> </text:span><text:span text:style-name="T2">(63/32) </text:span> ⲟⲩ ϩ̅ⲛ̅ ϯⲙ̅ⲛ̅ⲧ’ⲁⲧⲥⲟⲩⲱⲛ̅ⲥ̅· <text:line-break/><text:span text:style-name="T1"> </text:span><text:span text:style-name="T2">(63/33) </text:span> ⲉⲩⲛ̅ⲧⲁϥ ⲛ̅ⲛⲟⲩⲙ̅ⲛ̅ⲧ̅’̅ⲙⲁⲕⲁ <text:line-break/><text:span text:style-name="T1"> </text:span><text:span text:style-name="T2">(63/34) </text:span> ⲣⲓⲟⲥ ⲙ̅ⲛ̅ ⲟⲩⲙ̅ⲛⲧ’̅ⲧⲉⲗⲓⲟⲥ <text:line-break/><text:span text:style-name="T1"> </text:span><text:span text:style-name="T2">(63/35) </text:span> ⲙ̅ⲛ̅ ⲟⲩⲕⲁⲣⲱϥ 〈ⲛ̅ϯⲙ̅ⲛⲧ̅〉ⲙⲁⲕⲁⲣⲓ <text:line-break/><text:span text:style-name="T1"> </text:span><text:span text:style-name="T2">(63/36) </text:span> ⲟⲥ ⲁⲛ· ⲟⲩⲧⲉ ⲛ̅ϯⲙ̅ⲛ̅ⲧ̅’̅ⲧⲉ <text:line-break/><text:span text:style-name="T1"> </text:span><text:span text:style-name="T2">(63/37) </text:span> ⲗⲓⲟⲥ ⲁⲛ· ⲙ̅ⲛ̅ ⲟⲩϩⲣⲟⲕ· ⲁⲗⲗⲁ <text:line-break/><text:span text:style-name="T1"> </text:span><text:span text:style-name="T2">(63/38) </text:span> ⲟⲩⲗⲁⲁⲩ ⲛ̅ⲧⲁϥ ⲡⲉ ⲉϥϣⲟⲟⲡ· <text:line-break/><text:span text:style-name="T1"> </text:span><text:span text:style-name="T2">(63/39) </text:span> ⲡⲏ ⲉⲧⲉ ⲙ̅ⲙ̅ⲛ̅ϭⲟⲙ ⲛ̅ⲧⲉⲟⲩⲁ <text:line-break/><text:span text:style-name="T1"> </text:span><text:span text:style-name="T2">(64/1) </text:span> [ⲉⲓ]ⲙ̣ⲉ ⲉ̣ⲣⲟϥ ⲁⲩⲱ ⲉϥϩⲟⲣ̅ⲕ̅ ⲙ̅ <text:line-break/><text:span text:style-name="T1"> </text:span><text:span text:style-name="T2">(64/2) </text:span> [ⲙ]ⲟϥ· ⲁⲗⲗⲁ ⲉϩⲉⲛⲗⲁⲁⲩ ⲛⲉ ⲛ̣̅ <text:line-break/><text:span text:style-name="T1"> </text:span><text:span text:style-name="T2">(64/3) </text:span> [ⲧⲁ]ϥ ⲛ̅ⲛⲁⲧ’ⲥⲟⲩⲱⲛⲟⲩ ⲛⲁⲩ <text:line-break/><text:span text:style-name="T1"> </text:span><text:span text:style-name="T2">(64/4) </text:span> ⲧ̣ⲏⲣⲟⲩ· ⲉϥϫⲟⲥⲉ ⲇⲉ ϩ̅ⲛ̅ ϯⲙ̣̅[ⲛⲧ’̅] <text:line-break/><text:span text:style-name="T1"> </text:span><text:span text:style-name="T2">(64/5) </text:span> ⲥ̣ⲁⲉⲓⲉ ⲛ̅ϩⲟⲩⲟ ⲉⲛⲁⲓ%9 ⲧⲏⲣⲟ̣ⲩ̣ <text:line-break/><text:span text:style-name="T1"> </text:span><text:span text:style-name="T2">(64/6) </text:span> [ⲉⲧⲛ]ⲁⲛⲟ[ⲩ]ⲟⲩ· ⲡⲁⲓ̈ ⲇⲉ ⲛ̅ϯϩⲉ <text:line-break/><text:span text:style-name="T1"> </text:span><text:span text:style-name="T2">(64/7) </text:span> [ⲟⲩⲁ]ⲧ’ⲥⲟ̣[ⲩ]ⲱⲛ̅ϥ̅ ⲡⲉ ⲛⲁⲩ ⲧⲏ <text:line-break/><text:span text:style-name="T1"> </text:span><text:span text:style-name="T2">(64/8) </text:span> ⲣ̣[ⲟ]ⲩ̣ ⲕⲁⲧ̣ⲁ ⲥⲙⲟⲧ’ ⲛⲓⲙ· ⲁⲩⲱ <text:line-break/><text:span text:style-name="T1"> </text:span><text:span text:style-name="T2">(64/9) </text:span> ⲉⲃⲟⲗ ϩ̅ⲓ̅ⲧⲟⲟ̣ⲧⲟⲩ ⲧⲏⲣⲟⲩ ⲉϥ <text:line-break/><text:span text:style-name="T1"> </text:span><text:span text:style-name="T2">(64/10) </text:span> ϩⲣⲁⲓ̈ ⲛ̅ϩⲏⲧⲟ̣ⲩ̣ ⲧⲏⲣ̣ⲟⲩ ⲛ̅ϯⲅⲛⲱ̣ <text:line-break/><text:span text:style-name="T1"> </text:span><text:span text:style-name="T2">(64/11) </text:span> ⲥⲓⲥ ⲟⲩⲁⲁⲥ ⲁⲛ ⲛ̅ⲛⲁⲧⲥⲟⲩⲱⲛ̣̅̅[̅ⲥ̅] <text:line-break/><text:span text:style-name="T1"> </text:span><text:span text:style-name="T2">(64/12) </text:span> ⲧⲏ ⲉⲧ’ϣⲟⲟⲡ ⲕⲁⲧⲁⲣⲟϥ· ⲁⲩ[ⲱ] <text:line-break/><text:span text:style-name="T1"> </text:span><text:span text:style-name="T2">(64/13) </text:span> ⲉϥϩⲟⲧ̅ⲡ̅ ⲉⲃⲟⲗ ϩ̅ⲓ̅ⲧⲟⲟⲧ̅ⲥ̅ ⲛ̅ϯⲙ[ⲛ̅ⲧ’̅] <text:line-break/><text:span text:style-name="T1"> </text:span><text:span text:style-name="T2">(64/14) </text:span> ⲁⲧ’ⲥⲟⲩⲱⲛ̅ⲥ̅ ⲉⲧⲛⲁⲩ ⲉⲣⲟϥ· ⲏ%0 [ⲉϣ] <text:line-break/><text:span text:style-name="T1"> </text:span><text:span text:style-name="T2">(64/15) </text:span> 〈ϫⲉ ⲟⲩⲛ̅ ⲟⲩⲁ ⲉϥⲛⲁⲩ ⲉⲣⲟϥ〉 <text:line-break/><text:span text:style-name="T1"> </text:span><text:span text:style-name="T2">(64/16) </text:span> ϫⲉ ⲛ̅ⲁϣ ⲛ̅ϩⲉ ϥⲉ ⲛ̅ⲛⲁⲧ’ⲥⲟⲩⲱ <text:line-break/><text:span text:style-name="T1"> </text:span><text:span text:style-name="T2">(64/17) </text:span> ⲛ̅ϥ̅· ⲏ%0 ⲉϣϫⲉ̣ [ⲟ]ⲩⲛ̅ ⲟⲩⲁ ⲉϥⲛⲁⲩ <text:line-break/><text:span text:style-name="T1"> </text:span><text:span text:style-name="T2">(64/18) </text:span> ⲉⲣⲟϥ ⲕⲁⲧⲁ ⲑ̣ⲉ̣ ⲉⲧⲉϥϣⲟⲟⲡ ⲙ̅‐ <text:line-break/><text:span text:style-name="T1"> </text:span><text:span text:style-name="T2">(64/19) </text:span> ⲙⲟⲥ ⲕⲁⲧⲁ ⲥⲙⲟⲧ’ ⲛⲓⲙ· ⲏ%0 ⲉϣ <text:line-break/><text:span text:style-name="T1"> </text:span><text:span text:style-name="T2">(64/20) </text:span> ϫⲉ ⲟⲩⲛ̅ ⲟⲩⲁ ⲛⲁϫⲟⲟⲥ ⲉⲣⲟϥ ϫⲉ <text:line-break/><text:span text:style-name="T1"> </text:span><text:span text:style-name="T2">(64/21) </text:span> ⲉϥϣⲟⲟⲡ ⲛ̅ⲟⲩⲗⲁⲁⲩ ⲛ̅ⲑⲉ ⲛ̅ⲟⲩ <text:line-break/><text:span text:style-name="T1"> </text:span><text:span text:style-name="T2">(64/22) </text:span> ⲅⲛⲱⲥⲓⲥ· ⲁϥⲣ̅ⲁⲥⲉⲃⲏⲥ ⲉⲣⲟϥ <text:line-break/><text:span text:style-name="T1"> </text:span><text:span text:style-name="T2">(64/23) </text:span> ⲉⲩⲛ̅ⲧⲁϥ ⲛ̅ⲟⲩϩⲁⲡ ϫⲉ ⲙ̅ⲡⲉϥ <text:line-break/><text:span text:style-name="T1"> </text:span><text:span text:style-name="T2">(64/24) </text:span> ⲥⲟⲩⲱⲛ ⲡⲛⲟⲩⲧⲉ· ⲛ̅ⲛⲉϥⲛⲁ <text:line-break/><text:span text:style-name="T1"> </text:span><text:span text:style-name="T2">(64/25) </text:span> ϫⲓ ⲛ̅ⲟⲩϩⲁⲡ ⲁⲛ ⲉⲃⲟⲗ ϩ̅ⲓ̅ⲧⲟⲟⲧ̅ϥ̅ <text:line-break/><text:span text:style-name="T1"> </text:span><text:span text:style-name="T2">(64/26) </text:span> ⲙ̅ⲡⲏ ⲉⲧ̅ⲙ̅ⲙⲁⲩ· ⲡⲏ ⲉⲧⲉⲥⲣ̅ <text:line-break/><text:span text:style-name="T1"> </text:span><text:span text:style-name="T2">(64/27) </text:span> ⲙⲉⲗⲓ ⲛⲁϥ ⲁⲛ ϩⲁⲗⲁⲁⲩ· ⲟⲩⲧⲉ <text:line-break/><text:span text:style-name="T1"> </text:span><text:span text:style-name="T2">(64/28) </text:span> ⲙ̅ⲙ̅ⲛ̅ⲧ̅ϥ̅ ⲗⲁⲁⲩ ⲛ̅ⲟⲩⲱϣⲉ ⲙ̅‐ <text:line-break/><text:span text:style-name="T1"> </text:span><text:span text:style-name="T2">(64/29) </text:span> ⲙⲁⲩ· ⲁⲗⲗⲁ ⲛ̅ⲧⲟϥ 〈ϥ〉ⲉⲃⲟⲗ ⲙ̅ⲙⲟϥ <text:line-break/><text:span text:style-name="T1"> </text:span><text:span text:style-name="T2">(64/30) </text:span> ⲟⲩⲁⲁϥ ϫⲉ ⲙ̅ⲡⲉϥϭⲓⲛⲉ ⲛ̅ϯⲁⲣ <text:line-break/><text:span text:style-name="T1"> </text:span><text:span text:style-name="T2">(64/31) </text:span> ⲭⲏ ⲉⲧϣⲟⲟⲡ ⲟⲛⲧⲱⲥ· ⲁϥⲣ̅ ⲃ̅ⲗ̅ <text:line-break/><text:span text:style-name="T1"> </text:span><text:span text:style-name="T2">(64/32) </text:span> ⲗⲉ ⲛ̅ⲥⲁⲛⲃⲟⲗ ⲙ̅ⲡⲓⲃⲁⲗ ⲉⲧ’ϩⲟ <text:line-break/><text:span text:style-name="T1"> </text:span><text:span text:style-name="T2">(64/33) </text:span> ⲣ̅ⲕ̅ ⲙ̅ⲙⲟϥ ⲛ̅ⲧⲉ ⲡⲓⲟⲩⲱⲛ̅ϩ̅ <text:line-break/><text:soft-page-break/><text:span text:style-name="T1"> </text:span><text:span text:style-name="T2">(64/34) </text:span> ⲉⲃⲟⲗ· ⲡⲏ ⲉⲧⲉⲩⲣ̅ⲉⲛⲉⲣⲅⲓ <text:line-break/><text:span text:style-name="T1"> </text:span><text:span text:style-name="T2">(64/35) </text:span> ⲉⲣⲟϥ ⲡⲓ ⲉⲃⲟⲗ ϩ̅ⲙ̅ ⲡⲓϣⲙ̅ⲛⲧ’̅ <text:line-break/><text:span text:style-name="T1"> </text:span><text:span text:style-name="T2">(64/36) </text:span> ϭⲟⲙ ⲛ̅ⲧⲉ ϯϣⲟⲣ̅ⲡ̅ ⲛ̅ⲉⲛⲛⲟⲓ <text:line-break/><text:span text:style-name="T1"> </text:span><text:span text:style-name="T2">(64/37) </text:span> ⲁ ⲛ̅ⲧⲉ ⲡⲓⲁϩⲟⲣⲁⲧⲟⲛ ⲙ̅ⲡ̅ⲛ̅ⲁ̅ <text:line-break/><text:span text:style-name="T1"> </text:span><text:span text:style-name="T2">(64/38) </text:span> ⲡⲁⲓ̈ ⲛ̅ϯϩⲉ ⲉϥϣⲟⲟⲡ ⲉⲃⲟⲗ <text:line-break/><text:span text:style-name="T1"> </text:span><text:span text:style-name="T2">(65/14) </text:span> (Lines 1--14 lacking) <text:line-break/><text:span text:style-name="T1"> </text:span><text:span text:style-name="T2">(65/15) </text:span> [.....].[ <text:line-break/><text:span text:style-name="T1"> </text:span><text:span text:style-name="T2">(65/16) </text:span> [...]ⲗⲁⲁⲩ ⲁ[ <text:line-break/><text:span text:style-name="T1"> </text:span><text:span text:style-name="T2">(65/17) </text:span> [ⲧⲁϫ]ⲣ̣ⲏⲟⲩ ⲉⲛ̣[ 8+- ⲟ]ⲩ̣ <text:line-break/><text:span text:style-name="T1"> </text:span><text:span text:style-name="T2">(65/18) </text:span> [ⲙ̅]̅ⲛ̣̅̅ⲧ̅’̅ⲥⲁⲉⲓⲉ ⲙ̣ⲛ̣̅ ⲟ̣[ⲩϣ̅ⲣ]ⲡ̅ ⲛ̣̅ϣⲉ̣ <text:line-break/><text:span text:style-name="T1"> </text:span><text:span text:style-name="T2">(65/19) </text:span> ⲛ̅ⲧⲉ ⲟⲩϩⲣⲟⲕ· ⲙ̅ⲛ̅ [ⲟⲩ]ⲕⲁⲣⲱϥ <text:line-break/><text:span text:style-name="T1"> </text:span><text:span text:style-name="T2">(65/20) </text:span> ⲙ̅ⲛ̅ ⲟⲩⲙ̅ⲛ̅ⲧ’ϩⲣⲟⲕ ⲙⲛ̣̅ ⲟⲩⲙ̅ⲛ̅ <text:line-break/><text:span text:style-name="T1"> </text:span><text:span text:style-name="T2">(65/21) </text:span> [ⲧ]ⲛⲟϭ ⲛ̅ⲛⲁⲧ̅ⲛ̅ⲣⲁⲧ̅ⲥ̅ ⲉⲁϥⲟⲩⲱ <text:line-break/><text:span text:style-name="T1"> </text:span><text:span text:style-name="T2">(65/22) </text:span> ⲛ̣̅̅ϩ̅ ⲉⲃⲟⲗ· ⲛ̅ⲛⲉϥⲣ̅ ⲭⲣⲓⲁ ⲁⲛ ⲛ̅ⲟⲩ <text:line-break/><text:span text:style-name="T1"> </text:span><text:span text:style-name="T2">(65/23) </text:span> ⲭⲣⲟⲛⲟⲥ ⲟⲩⲧⲉ 〈ⲛ̅ⲛⲉϥϫⲓ ⲁⲛ〉 ⲉⲃⲟⲗ ⲟⲩⲉ <text:line-break/><text:span text:style-name="T1"> </text:span><text:span text:style-name="T2">(65/24) </text:span> ⲱⲛ· ⲁⲗⲗⲁ ⲛ̅ⲧⲟϥ ⲉⲃⲟⲗ ⲙ̅ⲙⲟϥ <text:line-break/><text:span text:style-name="T1"> </text:span><text:span text:style-name="T2">(65/25) </text:span> ⲟⲩⲁⲁϥ ⲉⲩⲁⲧ̅ⲛ̅ⲣⲁⲧ̅ϥ̅ ⲡⲉ ϩ̅ⲛ̅ ⲟⲩⲙ̅ⲛⲧ’̅ <text:line-break/><text:span text:style-name="T1"> </text:span><text:span text:style-name="T2">(65/26) </text:span> ⲁⲧ̅ⲛ̅ⲣⲁⲧ̅ⲥ̅· ⲉϥⲉⲛⲉⲣⲅⲓ ⲁⲛ ⲟⲩ <text:line-break/><text:span text:style-name="T1"> </text:span><text:span text:style-name="T2">(65/27) </text:span> ⲧⲉ ⲉⲣⲟϥ ϩ̅ⲓ̅ⲛⲁ ϫⲉ ⲉϥⲉϣⲱⲡⲉ <text:line-break/><text:span text:style-name="T1"> </text:span><text:span text:style-name="T2">(65/28) </text:span> ⲉϥϩⲟⲣ̅ⲕ̅ ⲙ̅ⲙⲟϥ· ⲟⲩⲧⲉ ⲛ̅ⲛⲟⲩ <text:line-break/><text:span text:style-name="T1"> </text:span><text:span text:style-name="T2">(65/29) </text:span> ϩⲩⲡⲁⲣⲝⲓⲥ ⲁⲛ ⲡⲉ ϩ̅ⲓ̅ⲛⲁ ϫⲉ ⲛⲉϥ <text:line-break/><text:span text:style-name="T1"> </text:span><text:span text:style-name="T2">(65/30) </text:span> ⲣ̅ϩⲁⲉ· ⲟⲩⲥⲱⲙⲁ ⲙⲉⲛ ⲡⲉ ⲉϥ <text:line-break/><text:span text:style-name="T1"> </text:span><text:span text:style-name="T2">(65/31) </text:span> ϩ̅ⲛ̅ ⲟⲩⲧⲟⲡⲟⲥ· ⲟⲩⲁⲧⲥⲱⲙⲁ <text:line-break/><text:span text:style-name="T1"> </text:span><text:span text:style-name="T2">(65/32) </text:span> ⲇⲉ ⲡⲉ ⲉϥϩ̅ⲛ̅ ⲟⲩⲏⲉⲓ· ⲉⲩⲛ̅ⲧⲁϥ <text:line-break/><text:span text:style-name="T1"> </text:span><text:span text:style-name="T2">(65/33) </text:span> ⲛ̅ⲛⲟⲩϩⲩⲡⲁⲣⲝⲓⲥ ⲛ̅ⲁⲧ’ϣⲱⲡⲉ <text:line-break/><text:span text:style-name="T1"> </text:span><text:span text:style-name="T2">(65/34) </text:span> ⲉϥϣⲟⲟⲡ ⲛⲁⲩ ⲧⲏⲣⲟⲩ ⲉⲣⲟϥ <text:line-break/><text:span text:style-name="T1"> </text:span><text:span text:style-name="T2">(65/35) </text:span> ⲉⲙ̅ⲛ̅ⲧⲁϥ ⲗⲁⲁⲩ ⲛ̅ⲟⲩⲱϣ ⲙ̅ <text:line-break/><text:span text:style-name="T1"> </text:span><text:span text:style-name="T2">(65/36) </text:span> ⲙⲁⲩ· ⲁⲗⲗⲁ ⲟⲩϩⲟⲩⲉ ϫⲓⲥⲉ <text:line-break/><text:span text:style-name="T1"> </text:span><text:span text:style-name="T2">(65/37) </text:span> ⲡⲉ ⲛ̅ⲧⲉ ⲟⲩⲙ̅ⲛ̅ⲧⲛⲟϭ· ⲁⲩⲱ <text:line-break/><text:span text:style-name="T1"> </text:span><text:span text:style-name="T2">(65/38) </text:span> ⲉϥϫⲟⲥⲉ ⲉⲡⲉϥϩⲣⲟⲕ· ϩ̅ⲓ̅ⲛⲁ <text:line-break/><text:span text:style-name="T1"> </text:span><text:span text:style-name="T2">(66/14) </text:span> (Lines 1--14 lacking) <text:line-break/><text:span text:style-name="T1"> </text:span><text:span text:style-name="T2">(66/15) </text:span> [ 13+- ].ⲛⲏ̣[ <text:line-break/><text:span text:style-name="T1"> </text:span><text:span text:style-name="T2">(66/16) </text:span> [ 10+- ⲁϥ]ⲛ̣ⲁⲩ ⲉⲣⲟ[ⲟⲩ] <text:line-break/><text:span text:style-name="T1"> </text:span><text:span text:style-name="T2">(66/17) </text:span> ⲁ̣ϥ̣ϯ̣[ϭⲟⲙ ⲉⲣⲟⲟⲩ ⲧⲏⲣ]ⲟⲩ ⲉⲛⲥ̣[ⲣ̅] <text:line-break/><text:span text:style-name="T1"> </text:span><text:span text:style-name="T2">(66/18) </text:span> ⲙ̣ⲉⲗⲓ ⲛⲁ[ⲩ ⲁⲛ] ⲙ̣̅[ⲡ]ⲏ̣ ⲉⲧ̅ⲙ̅ⲙⲁⲩ̣ [ⲛ̅] <text:line-break/><text:span text:style-name="T1"> </text:span><text:span text:style-name="T2">(66/19) </text:span> ⲗⲁⲁⲩ· ⲟⲩ̣ⲧ̣ⲉ ⲉϣⲱⲡⲉ ⲉϣⲁⲟⲩⲁ̣ <text:line-break/><text:span text:style-name="T1"> </text:span><text:span text:style-name="T2">(66/20) </text:span> ϫⲓ ⲉⲃⲟⲗ ⲙ̅ⲙⲟϥ· ⲙⲉϥϫⲓ ϭⲟⲙ· ⲟⲩ <text:line-break/><text:span text:style-name="T1"> </text:span><text:span text:style-name="T2">(66/21) </text:span> ⲧⲉ ⲙⲉⲣⲉⲗⲁⲁⲩ ⲉⲛⲉⲣⲅⲓ ⲉⲣⲟϥ ⲕⲁ̣ <text:line-break/><text:span text:style-name="T1"> </text:span><text:span text:style-name="T2">(66/22) </text:span> ⲧⲁ ϯⲙ̅ⲛ̅ⲧ̅’̅ⲟⲩⲱⲧ’ ⲉⲧ’ϩⲟⲣ̅ⲕ̅ ⲙ̅ⲙⲟ̣[ⲥ] <text:line-break/><text:span text:style-name="T1"> </text:span><text:span text:style-name="T2">(66/23) </text:span> ⲟⲩⲁⲧ’ⲥⲟⲩⲱⲛ̅ϥ̅ ⲅⲁⲣ ⲡⲉ· ⲉⲩⲧⲟ <text:line-break/><text:span text:style-name="T1"> </text:span><text:span text:style-name="T2">(66/24) </text:span> ⲡⲟⲥ ⲅⲁⲣ ⲡⲉ ⲛ̅ⲛⲁⲧⲛⲓϥⲉ ⲛ̅ⲧⲉ <text:line-break/><text:span text:style-name="T1"> </text:span><text:span text:style-name="T2">(66/25) </text:span> ϯⲙ̅ⲛ̅ⲧ̅’̅ⲁⲧ̅ⲛ̅ⲁⲣⲏϫ̅ⲥ̅· ϩⲱⲥ ⲉⲩⲁ <text:line-break/><text:span text:style-name="T1"> </text:span><text:span text:style-name="T2">(66/26) </text:span> ⲧ̅ⲛ̅ⲁⲣⲏϫ̅ϥ̅ ⲡⲉ ⲙ̅ⲛ̅ ⲟⲩⲁⲧ’ϭⲁⲙ· <text:line-break/><text:span text:style-name="T1"> </text:span><text:span text:style-name="T2">(66/27) </text:span> ⲁⲩⲱ ⲟⲩⲁⲧ’ϣⲱⲡⲉ· ⲛ̅ⲛⲉϥϯ <text:line-break/><text:span text:style-name="T1"> </text:span><text:span text:style-name="T2">(66/28) </text:span> ⲙ̅ⲡϣⲱⲡⲉ ⲁⲛ· ⲁⲗⲗⲁ ⲉϥϣⲱⲡ <text:line-break/><text:span text:style-name="T1"> </text:span><text:span text:style-name="T2">(66/29) </text:span> ⲛ̅ⲛⲁⲓ̈ ⲧⲏⲣⲟⲩ ⲉⲣⲟϥ ⲉϥϩⲟⲣ̅ⲕ̅ <text:line-break/><text:span text:style-name="T1"> </text:span><text:span text:style-name="T2">(66/30) </text:span> ⲙ̅ⲙⲟϥ ⲉϥⲁϩⲉⲣⲁⲧ̅ϥ̅ ⲉⲃⲟⲗ ϩ̅ⲙ̅ <text:line-break/><text:soft-page-break/><text:span text:style-name="T1"> </text:span><text:span text:style-name="T2">(66/31) </text:span> ⲡⲏ ⲉⲧⲁϩⲉⲣⲁⲧ̅ϥ̅ ⲛ̅ⲟⲩⲟⲉⲓϣ <text:line-break/><text:span text:style-name="T1"> </text:span><text:span text:style-name="T2">(66/32) </text:span> ⲛⲓⲙ· ⲉⲁϥⲟⲩⲱⲛ̅ϩ̅ ⲉⲃⲟⲗ ⲛ̅ϭⲓ <text:line-break/><text:span text:style-name="T1"> </text:span><text:span text:style-name="T2">(66/33) </text:span> ⲟⲩⲱⲛ̅ϩ̅ ⲛ̅ϣⲁⲉⲛⲉϩ· ⲡⲓⲡ̅ⲛⲁ̅ <text:line-break/><text:span text:style-name="T1"> </text:span><text:span text:style-name="T2">(66/34) </text:span> ⲛ̅ⲛⲁⲧ’ⲛⲁⲩ ⲉⲣⲟϥ ⲁⲩⲱ ⲛ̅ϣⲙ̅ⲛ̅ⲧ̅’̅ <text:line-break/><text:span text:style-name="T1"> </text:span><text:span text:style-name="T2">(66/35) </text:span> ϭⲟⲙ· ⲡⲓⲟⲩⲁ ⲉⲧ’ϩ̅ⲛ̅ ⲛⲁⲓ̈ ⲧⲏⲣⲟⲩ <text:line-break/><text:span text:style-name="T1"> </text:span><text:span text:style-name="T2">(66/36) </text:span> ⲉⲧ’ϣⲟⲟⲡ· ⲁⲩⲱ ⲉϥ̅ⲙ̅ⲡⲉⲩ <text:line-break/><text:span text:style-name="T1"> </text:span><text:span text:style-name="T2">(66/37) </text:span> ⲕⲱⲧⲉ ⲧⲏⲣⲟⲩ ⲉϥϫⲟⲥⲉ ⲉ <text:line-break/><text:span text:style-name="T1"> </text:span><text:span text:style-name="T2">(66/38) </text:span> ⲣⲟⲟⲩ ⲧⲏⲣⲟⲩ· ⲟⲩϩⲁⲓ̈ⲃⲉⲥ <text:line-break/><text:span text:style-name="T1"> </text:span><text:span text:style-name="T2">(67/14) </text:span> (Lines 1--14 lacking) <text:line-break/><text:span text:style-name="T1"> </text:span><text:span text:style-name="T2">(67/15) </text:span> [..].[ <text:line-break/><text:span text:style-name="T1"> </text:span><text:span text:style-name="T2">(67/16) </text:span> [..]ⲉⲧⲁϥ.ⲣ̣[ ⲁⲩ] <text:line-break/><text:span text:style-name="T1"> </text:span><text:span text:style-name="T2">(67/17) </text:span> [ⲙⲟ]ϩ̅ϥ̅ ⲉⲃⲟ[ⲗ ϩ̅ⲓ̅ⲧ̅ⲛ̅ ⲟⲩϭⲟⲙ· ⲁⲩⲱ] <text:line-break/><text:span text:style-name="T1"> </text:span><text:span text:style-name="T2">(67/18) </text:span> [ⲁϥ]ⲁ̣ϩⲉⲣⲁⲧ̅ϥ̅ ϩ̣[ⲁ]ⲑ̣ⲏ̣ [ⲛ̅]ⲛ̣ⲁ[ⲓ̈] ⲉ̣ϥ̣ϯ̣ <text:line-break/><text:span text:style-name="T1"> </text:span><text:span text:style-name="T2">(67/19) </text:span> ϭ̣ⲟⲙ ⲛ̅ⲛⲁⲓ̈ ⲧⲏⲣⲟⲩ· ⲁϥⲙⲟⲩϩ <text:line-break/><text:span text:style-name="T1"> </text:span><text:span text:style-name="T2">(67/20) </text:span> ⲛ̅ⲛⲁⲓ̈ ⲧⲏⲣⲟⲩ ⲉⲃⲟⲗ· ⲁⲩⲱ ⲉ <text:line-break/><text:span text:style-name="T1"> </text:span><text:span text:style-name="T2">(67/21) </text:span> [ⲧ]ⲃⲉ ⲛⲁⲓ̈ ⲙⲉⲛ ⲧⲏⲣⲟⲩ ⲁⲕⲥⲱ <text:line-break/><text:span text:style-name="T1"> </text:span><text:span text:style-name="T2">(67/22) </text:span> ⲧ̅ⲙ̅ ϩ̅ⲛ̅ ⲟⲩⲧⲁϫⲣⲟ· ⲁⲩⲱ ⲙ̅ⲡ̅ⲣ̅ <text:line-break/><text:span text:style-name="T1"> </text:span><text:span text:style-name="T2">(67/23) </text:span> ⲕⲱⲧⲉ ⲛ̅ⲥⲁ ⲗⲁⲁⲩ ⲛ̅ϩⲟⲩⲟ̅· <text:line-break/><text:span text:style-name="T1"> </text:span><text:span text:style-name="T2">(67/24) </text:span> ⲁⲗⲗⲁ ⲙⲟϣⲉ ⲛⲁⲕ· ⲟⲩⲧⲉ ⲛ̅ <text:line-break/><text:span text:style-name="T1"> </text:span><text:span text:style-name="T2">(67/25) </text:span> ⲧ̅ⲛ̅ⲥⲟⲟⲩⲛ ⲁⲛ ϫⲉ ⲟⲩⲛ̅ⲧⲉ <text:line-break/><text:span text:style-name="T1"> </text:span><text:span text:style-name="T2">(67/26) </text:span> ⲡⲓⲁⲧ’ⲥⲟⲩⲱⲛ̅ϥ̅ ⲟⲩⲛ̅ⲧⲁϥ <text:line-break/><text:span text:style-name="T1"> </text:span><text:span text:style-name="T2">(67/27) </text:span> ⲛ̅ϩⲉⲛⲁⲅⲅⲉⲗⲟⲥ· ⲟⲩⲧⲉ ϩⲉⲛ <text:line-break/><text:span text:style-name="T1"> </text:span><text:span text:style-name="T2">(67/28) </text:span> ⲛⲟⲩⲧⲉ· ⲟⲩⲧⲉ ⲡⲏ ⲉⲧ’ϩⲟⲣ̅ⲕ̅ <text:line-break/><text:span text:style-name="T1"> </text:span><text:span text:style-name="T2">(67/29) </text:span> ⲙ̅ⲙⲟϥ· ϫⲉ ⲛⲉⲟⲩⲛ̅ⲧⲁϥ ⲛ̅ⲟⲩ <text:line-break/><text:span text:style-name="T1"> </text:span><text:span text:style-name="T2">(67/30) </text:span> ⲗⲁⲁⲩ ϩⲣⲁⲓ̈ ⲛ̅ϩⲏⲧ̅ϥ̅ ⲛ̅ⲥⲁⲃⲏⲗ ⲉ <text:line-break/><text:span text:style-name="T1"> </text:span><text:span text:style-name="T2">(67/31) </text:span> ⲡⲓϩⲣⲟⲕ ⲉⲧⲉ ⲡⲁⲓ̈ ⲡⲉ ϫⲉ ⲛ̅ⲧⲟϥ <text:line-break/><text:span text:style-name="T1"> </text:span><text:span text:style-name="T2">(67/32) </text:span> ϩ̅ⲓ̅ⲛⲁ ϫⲉ ⲛ̅ⲛⲉⲩϣⲁϩϫ̅ϥ̅· ⲟⲩ <text:line-break/><text:span text:style-name="T1"> </text:span><text:span text:style-name="T2">(67/33) </text:span> ⲧⲉ ⲙ̅ⲡⲉⲧⲉϣϣⲉ ⲁⲛ ⲡⲉ ⲉ <text:line-break/><text:span text:style-name="T1"> </text:span><text:span text:style-name="T2">(67/34) </text:span> ϫⲱⲱⲣⲉ ⲉⲃⲟⲗ ⲛ̅ϩⲟⲩⲟ ⲛ̅ⲟⲩ <text:line-break/><text:span text:style-name="T1"> </text:span><text:span text:style-name="T2">(67/35) </text:span> ⲏⲡⲉ ⲛ̅ⲥⲟⲡ ⲉⲕⲕⲱⲧⲉ· ⲛⲉⲥ <text:line-break/><text:span text:style-name="T1"> </text:span><text:span text:style-name="T2">(67/36) </text:span> ⲙ̅ⲡϣⲁ ⲛ̅ⲧⲉⲧ̅ⲛ̅ⲉⲓⲙⲉ ⲟⲩ <text:line-break/><text:span text:style-name="T1"> </text:span><text:span text:style-name="T2">(67/37) </text:span> ⲁⲉⲧ 〈ⲧⲏⲛⲉ〉· ⲁⲩⲱ ⲛ̅ⲥⲉϣⲁϫⲉ <text:line-break/><text:span text:style-name="T1"> </text:span><text:span text:style-name="T2">(67/38) </text:span> ⲙ̅ⲛ̅ ⲕⲉⲟⲩⲁ· ⲁⲗⲗⲁ ⲉⲕⲁϫⲓⲧⲟⲩ <text:line-break/><text:span text:style-name="T1"> </text:span><text:span text:style-name="T2">(68/14) </text:span> (Lines 1--14 lacking) <text:line-break/><text:span text:style-name="T1"> </text:span><text:span text:style-name="T2">(68/15) </text:span> [ 13+- ]..[ <text:line-break/><text:span text:style-name="T1"> </text:span><text:span text:style-name="T2">(68/16) </text:span> [..ⲁⲩⲱ ⲡ]ⲉ̣ϫ[ⲁϥ ⲛⲁ]ⲓ̣%9 ϫⲉ ⲥϩⲁ[ⲓ̈ ⲛ̅] <text:line-break/><text:span text:style-name="T1"> </text:span><text:span text:style-name="T2">(68/17) </text:span> [ⲛ]ⲏ̣ ⲉ̣ϯ̣ⲛⲁϫ[ⲟⲟ]ⲩ̣ ⲛⲁⲕ· ⲁⲩ[ⲱ] <text:line-break/><text:span text:style-name="T1"> </text:span><text:span text:style-name="T2">(68/18) </text:span> ⲉϯⲛⲁϯ ⲙⲉⲉⲩⲉ ⲛⲁⲕ ⲉⲧⲃⲏ <text:line-break/><text:span text:style-name="T1"> </text:span><text:span text:style-name="T2">(68/19) </text:span> ⲏⲧⲟⲩ ⲛ̅ⲛⲁⲓ̈ ⲉⲧⲛⲁⲣ̅ⲙ̅ⲡϣⲁ ⲙ̣̅‐ <text:line-break/><text:span text:style-name="T1"> </text:span><text:span text:style-name="T2">(68/20) </text:span> ⲙ̅ⲛ̅ⲛ̅ⲥⲱⲕ· ⲁⲩⲱ ⲉⲕⲉⲕⲱ ⲙ̅ <text:line-break/><text:span text:style-name="T1"> </text:span><text:span text:style-name="T2">(68/21) </text:span> ⲡⲉⲓ̈ϫⲱⲱⲙⲉ ϩ̅ⲓ̅ϫ̅ⲛ̅ ⲟⲩⲧⲟⲟⲩ̣ <text:line-break/><text:span text:style-name="T1"> </text:span><text:span text:style-name="T2">(68/22) </text:span> ⲛ̅ⲅ̅ⲙⲟⲩⲧⲉ ⲉϩⲣⲁⲓ̈ ⲟⲩⲃⲉ ⲡⲓⲣⲉ̣[ϥ] <text:line-break/><text:span text:style-name="T1"> </text:span><text:span text:style-name="T2">(68/23) </text:span> ⲁⲣⲉϩ ⲉⲙⲟⲩ ⲫⲣⲓⲕⲧⲟⲥ· ⲛⲁⲓ̈ <text:line-break/><text:span text:style-name="T1"> </text:span><text:span text:style-name="T2">(68/24) </text:span> ⲇⲉ ⲛ̅ⲧⲉⲣⲉϥϫⲟⲟⲩ ⲁϥⲡⲱⲣ̅ϫ̅ <text:line-break/><text:span text:style-name="T1"> </text:span><text:span text:style-name="T2">(68/25) </text:span> ⲉⲃⲟⲗ ⲙ̅ⲙⲟⲓ̈· ⲁ̣ⲛⲟⲕ ⲇⲉ ⲁⲓ̈ⲙⲟⲩϩ <text:line-break/><text:span text:style-name="T1"> </text:span><text:span text:style-name="T2">(68/26) </text:span> ⲉⲃⲟⲗ ϩ̅ⲛ̅ ⲟⲩⲣⲁϣⲉ· ⲁⲓ̈ⲥϩⲁⲓ̈ ⲇⲉ <text:line-break/><text:span text:style-name="T1"> </text:span><text:span text:style-name="T2">(68/27) </text:span> ⲙ̅ⲡⲉⲓ̈ϫⲱⲱⲙⲉ ⲉⲧⲁⲩⲧⲱϣ <text:line-break/><text:soft-page-break/><text:span text:style-name="T1"> </text:span><text:span text:style-name="T2">(68/28) </text:span> ⲛⲁⲓ̈ ⲡⲁϣⲏⲣⲉ ⲙ̅ⲉ̅ⲥ̅ⲥ̅ⲟ̅ⲥ̅· ϫⲉ <text:line-break/><text:span text:style-name="T1"> </text:span><text:span text:style-name="T2">(68/29) </text:span> ⲉⲓ̈ⲉϭⲱⲗ̅ⲡ̅ ⲛⲁⲕ ⲉⲃⲟⲗ ⲛ̅ⲛⲏ ⲉ <text:line-break/><text:span text:style-name="T1"> </text:span><text:span text:style-name="T2">(68/30) </text:span> ⲧⲁⲩⲧⲁϣⲉ ⲟⲉⲓϣ ⲙ̅ⲙⲟⲟⲩ ⲛⲁ <text:line-break/><text:span text:style-name="T1"> </text:span><text:span text:style-name="T2">(68/31) </text:span> ϩⲣⲁⲓ̈ ⲛ̅ϩⲏⲧ’ ⲡϣⲟⲣ̅ⲡ̅ ⲇⲉ ⲁⲓ̈ϫⲓ <text:line-break/><text:span text:style-name="T1"> </text:span><text:span text:style-name="T2">(68/32) </text:span> ⲧⲟⲩ ϩ̅ⲛ̅ ⲟⲩⲛⲟϭ ⲛ̅ⲥⲓⲅⲏ[·] ⲁⲩⲱ <text:line-break/><text:span text:style-name="T1"> </text:span><text:span text:style-name="T2">(68/33) </text:span> ⲁⲉⲓⲁϩⲉⲣ̣ⲁⲧ’ ⲕⲁⲧⲁⲣⲟⲓ̈ ⲉⲓ̈ⲥⲟⲃ <text:line-break/><text:span text:style-name="T1"> </text:span><text:span text:style-name="T2">(68/34) </text:span> ⲧⲉ ⲙ̅ⲙ[ⲟ]ⲉⲓ· ⲛⲁⲓ̈ ⲛⲉ ⲛⲏ ⲉⲧⲁⲩ <text:line-break/><text:span text:style-name="T1"> </text:span><text:span text:style-name="T2">(68/35) </text:span> ϭⲟⲗⲡⲟ̣[ⲩ] ⲛⲁⲓ̈ ⲉⲃⲟⲗ ⲱ͂ ⲡⲁϣⲏ <text:line-break/><text:span text:style-name="T1"> </text:span><text:span text:style-name="T2">(69/1) </text:span> [ⲣⲉ ⲙⲉⲥⲥⲟⲥ] <text:line-break/><text:span text:style-name="T1"> </text:span><text:span text:style-name="T2">(69/13) </text:span> (Lines 1--13 lacking) <text:line-break/><text:span text:style-name="T1"> </text:span><text:span text:style-name="T2">(69/14) </text:span> [ʹ99 ⲧⲁϣⲉ ‐‐] <text:line-break/><text:span text:style-name="T1"> </text:span><text:span text:style-name="T2">(69/15) </text:span> [ʹ99] ⲟⲉⲓϣ ⲙ̣̅[ⲙⲟⲟⲩ ⲱ͂ ⲡⲁ ‐‐] <text:line-break/><text:span text:style-name="T1"> </text:span><text:span text:style-name="T2">(69/16) </text:span> ʹ99 ϣⲏⲣⲉ ⲙⲉ̣[ⲥⲥ]ⲟ̣ⲥ̣ [ⲛ̅ϯ ‐‐] <text:line-break/><text:span text:style-name="T1"> </text:span><text:span text:style-name="T2">(69/17) </text:span> ʹ99 ⲥⲫⲣⲁⲅ̣ⲓ̣ⲥ̣ [ⲛ̅]ⲧⲉ̣ [ⲛⲓϫⲱ] ‐‐ <text:line-break/><text:span text:style-name="T1"> </text:span><text:span text:style-name="T2">(69/18) </text:span> ʹ99 ⲱⲙⲉ ⲧⲏ̣ⲣⲟⲩ ⲛ̣̅[ⲧⲉ] ‐‐ <text:line-break/><text:span text:style-name="T1"> </text:span><text:span text:style-name="T2">(69/19) </text:span> ʹ99 ⲡⲁⲗⲗⲟ̣[ⲅⲉ]ⲛ̣ⲏⲥ̣ ʹ26 <text:line-break/><text:span text:style-name="T1"> </text:span><text:span text:style-name="T2">(69/20) </text:span> ʹ99 {2̅ⲡ}2ⲁⲗ[{2ⲗ}2]ⲟ{2ⲅⲉ}2ⲛ{2ⲏⲥ̣}2 <text:line-break/><text:span text:style-name="T1"> </text:span><text:span text:style-name="T2">(69/21) </text:span> ʹ26 </text:p>
      <text:p text:style-name="P1"/>
      <text:p text:style-name="P3">( codex XI ) Hypsiphrone</text:p>
      <text:p text:style-name="P2"><text:span text:style-name="T1"> </text:span><text:span text:style-name="T2">(69/21) </text:span> ʹ99 ⲩ̈ⲯⲓⲫ[ⲣⲟⲛⲏ] <text:line-break/><text:span text:style-name="T1"> </text:span><text:span text:style-name="T2">(69/22) </text:span> ʹ99 <text:line-break/><text:span text:style-name="T1"> </text:span><text:span text:style-name="T2">(69/23) </text:span> ⲡϫⲱⲱⲙ̣ⲉ̣ [ⲉⲧⲃⲉ ⲛⲉ]ⲧⲁ[ⲩ] <text:line-break/><text:span text:style-name="T1"> </text:span><text:span text:style-name="T2">(69/24) </text:span> ⲛⲁⲩ ⲉⲣⲟⲟⲩ̣ [ⲛ̅ⲧⲛ̅ ⲩ̈ⲯⲓ]ⲫⲣⲟ <text:line-break/><text:span text:style-name="T1"> </text:span><text:span text:style-name="T2">(69/25) </text:span> ⲛⲏ· ⲉⲩ[ⲟⲩⲱⲛϩ ⲉⲃⲟ]ⲗ̣ ϩ̅ⲙ̅ <text:line-break/><text:span text:style-name="T1"> </text:span><text:span text:style-name="T2">(69/26) </text:span> ⲡⲧⲟⲡⲟⲥ ⲛ̣̅[ⲧⲉⲥⲙ̅ⲛ̅]̅ⲧ̣̅̅ⲡⲁⲣ <text:line-break/><text:span text:style-name="T1"> </text:span><text:span text:style-name="T2">(69/27) </text:span> ⲑ̣ⲉⲛⲟⲥ· ⲁ[ⲩⲱ ⲥ̅ⲥⲱⲧ]ⲙ ⲉ <text:line-break/><text:span text:style-name="T1"> </text:span><text:span text:style-name="T2">(69/28) </text:span> ⲛⲉⲥⲥⲛⲏⲩ̣ [ 6+- ]ⲫⲁ̅ⲓ̅ <text:line-break/><text:span text:style-name="T1"> </text:span><text:span text:style-name="T2">(69/29) </text:span> ⲛ̅ⲱ̣̅̅ⲯ̅ ⲙ̅ⲛ̅ ⲥ̣[ 6+- ⲁ]ⲩ̣ⲱ <text:line-break/><text:span text:style-name="T1"> </text:span><text:span text:style-name="T2">(69/30) </text:span> ⲉⲩϣⲁϫⲉ ⲙ[ⲛ̅ ⲛⲟⲩⲉⲣ]ⲏⲩ <text:line-break/><text:span text:style-name="T1"> </text:span><text:span text:style-name="T2">(69/31) </text:span> ϩ̅ⲛ̅ ⲟⲩⲙⲩ[ⲥⲧⲏⲣⲓⲟⲛ] ⲁⲛⲟⲕ <text:line-break/><text:span text:style-name="T1"> </text:span><text:span text:style-name="T2">(69/32) </text:span> ⲇⲉ ⲛⲉⲩϣ[ⲟⲣ̅ⲡ̅ ⲡⲉ ⲛ̅]ⲱ̣ⲡ ⲛ̅ <text:line-break/><text:span text:style-name="T1"> </text:span><text:span text:style-name="T2">(69/33) </text:span> ⲥⲁ[ⲟⲩⲥⲁ].’[ 8+- ].ⲡⲉ <text:line-break/><text:span text:style-name="T1"> </text:span><text:span text:style-name="T2">(69/34) </text:span> [ 14+- ].̅ <text:line-break/><text:span text:style-name="T1"> </text:span><text:span text:style-name="T2">(70/13) </text:span> (Lines 1--13 lacking) <text:line-break/><text:span text:style-name="T1"> </text:span><text:span text:style-name="T2">(70/14) </text:span> [ 10+- ]ⲟⲓ̣%9 ⲁⲓ̈ⲉⲓ [ⲉⲃⲟⲗ] <text:line-break/><text:span text:style-name="T1"> </text:span><text:span text:style-name="T2">(70/15) </text:span> [ⲉⲡⲓⲧⲟ]ⲡ̣ⲟ̣[ⲥ ⲛ̅]ⲧ̣ⲉ ⲧⲁⲙ̅ⲛ̅ⲧ̅’̅[ⲡⲁⲣ] <text:line-break/><text:span text:style-name="T1"> </text:span><text:span text:style-name="T2">(70/16) </text:span> ⲑⲉ[ⲛⲟⲥ] ⲁ̣ⲩ[ⲱ] ⲁⲉ̣ⲓⲃⲱⲕ ⲉ̣[ϩ]ⲣ̣ⲁ̣[ⲓ̈] <text:line-break/><text:span text:style-name="T1"> </text:span><text:span text:style-name="T2">(70/17) </text:span> ⲉⲡ̣[ⲕⲟⲥ]ⲙ̣ⲟⲥ[· ⲧ]ⲟ̣ⲧⲉ ⲁⲩⲧⲁ <text:line-break/><text:span text:style-name="T1"> </text:span><text:span text:style-name="T2">(70/18) </text:span> ⲙ[ⲟⲓ̈ ⲉⲧⲃ]ⲉ̣ ⲛ̣ⲏ[· ⲛ̅]ϭ̣ⲓ̣ ⲛⲏ ⲉⲧⲙⲏⲛ <text:line-break/><text:span text:style-name="T1"> </text:span><text:span text:style-name="T2">(70/19) </text:span> ⲉⲡ̣[ⲓⲧⲟⲡ]ⲟⲥ ⲛ̣̅ⲧⲉ ⲧⲁⲙⲛⲧ’ <text:line-break/><text:span text:style-name="T1"> </text:span><text:span text:style-name="T2">(70/20) </text:span> ⲡⲁ̣[ⲣⲑⲉⲛ]ⲟ̣ⲥ̣· ⲁ[ⲩ]ⲱ ⲁⲓ̈ⲃⲱⲕ <text:line-break/><text:span text:style-name="T1"> </text:span><text:span text:style-name="T2">(70/21) </text:span> ⲉϩⲣⲁ̣[ⲓ̈ ⲉⲡⲕⲟⲥⲙ]ⲟ̣ⲥ̣· ⲁⲩⲱ ⲡⲉ <text:line-break/><text:span text:style-name="T1"> </text:span><text:span text:style-name="T2">(70/22) </text:span> ϫⲁⲩ ⲛⲁ̣[ⲓ̈ ϫⲉ ⲕⲉⲥⲟⲡ] ⲁⲩ̈ⲯⲫⲣⲟ <text:line-break/><text:span text:style-name="T1"> </text:span><text:span text:style-name="T2">(70/23) </text:span> ⲛⲏ̣ ⲣ̅ⲁ̣[ⲛⲁⲭⲱⲣⲓ ⲛ̅ⲥ]ⲁⲛⲃⲟⲗ ⲙ̅ <text:line-break/><text:span text:style-name="T1"> </text:span><text:span text:style-name="T2">(70/24) </text:span> ⲡ̣ⲙ̣ⲁ̣ [ⲛ̅ⲧⲉⲥⲙ̅]̅ⲛ̣̅̅ⲧ̅’̣̅̅ ⲡⲁⲣⲑⲉⲛⲟⲥ· <text:line-break/><text:span text:style-name="T1"> </text:span><text:span text:style-name="T2">(70/25) </text:span> ⲧⲟⲧ[ⲉ ⲁⲡⲉⲧⲁ]ϥ̣ⲥⲱⲧ̅ⲙ̅ ⲛ̅ϭⲓ <text:line-break/><text:span text:style-name="T1"> </text:span><text:span text:style-name="T2">(70/26) </text:span> ⲫⲁⲓ̅ⲛ̣̅̅[̅ⲱ̅ⲯ̅ ⲡⲉⲧⲛ]ⲓ̣ϥ̣ⲉ ⲉϩⲟⲩⲛ̣ <text:line-break/><text:span text:style-name="T1"> </text:span><text:span text:style-name="T2">(70/27) </text:span> ϩ̅ⲛ̅ ⲧ̣[ⲥ̅ⲡⲏⲅⲏ ⲛ̅]ⲥ̣ⲛ̣ⲟ̣ϥ ⲡⲱⲣ̣̅ϣ̣̅ <text:line-break/><text:span text:style-name="T1"> </text:span><text:span text:style-name="T2">(70/28) </text:span> ⲛⲉ̣ⲥ̣ [ⲉⲃⲟⲗ· ⲁⲩ]ⲱ̣ ⲡⲉϫⲁϥ <text:line-break/><text:span text:style-name="T1"> </text:span><text:span text:style-name="T2">(70/29) </text:span> ϫⲉ̣ [ⲁⲛⲟⲕ ⲡⲉ ⲫⲁ̅ⲓ̅]̅ⲛ̣̅̅[̅ⲱ̅]̅ⲯ̣̅̅ .ⲟⲛ <text:line-break/><text:span text:style-name="T1"> </text:span><text:span text:style-name="T2">(70/30) </text:span> ⲁ̣.ⲛ[ 6+- ]..[.].[.].[.]. <text:line-break/><text:span text:style-name="T1"> </text:span><text:span text:style-name="T2">(70/31) </text:span> ...[ 6+- ].[....]ⲩ̣ⲁ <text:line-break/><text:span text:style-name="T1"> </text:span><text:span text:style-name="T2">(70/32) </text:span> ...[ 6+- ]..[.].[.]ⲓ̣ⲧⲉ <text:line-break/><text:span text:style-name="T1"> </text:span><text:span text:style-name="T2">(70/33) </text:span> ...[ 12+- ]ⲁϥ <text:line-break/><text:span text:style-name="T1"> </text:span><text:span text:style-name="T2">(70/34) </text:span> [ <text:line-break/><text:span text:style-name="T1"> </text:span><text:span text:style-name="T2">(71/16) </text:span> (Lines 1--16 lacking) <text:line-break/><text:span text:style-name="T1"> </text:span><text:span text:style-name="T2">(71/17) </text:span> ⲛ̣[ <text:line-break/><text:span text:style-name="T1"> </text:span><text:span text:style-name="T2">(71/18) </text:span> ⲥⲱ̣ⲣⲙ̣̅ ⲙ̣̅[ <text:line-break/><text:span text:style-name="T1"> </text:span><text:span text:style-name="T2">(71/19) </text:span> ⲁϥⲁ.ⲧⲉ ⲛ̅[ 9+- ⲟ]ⲩ <text:line-break/><text:span text:style-name="T1"> </text:span><text:span text:style-name="T2">(71/20) </text:span> ⲉ̣ⲡⲓⲑⲩⲙⲓⲁ[ 9+- ⲧ]ⲏ̣ <text:line-break/><text:span text:style-name="T1"> </text:span><text:span text:style-name="T2">(71/21) </text:span> [ⲡ]ⲉ ⲛ̣̅ⲛⲓⲕⲉϣⲱϫ̅ⲡ̅ ⲛ̣̅[ⲣⲱⲙ]ⲉ <text:line-break/><text:span text:style-name="T1"> </text:span><text:span text:style-name="T2">(71/22) </text:span> ⲏ%0 ⲛ̅ⲧⲁⲛⲁⲩ ⲉⲩⲣⲱ̣[ⲙⲉ ⲡⲉⲓ] <text:line-break/><text:span text:style-name="T1"> </text:span><text:span text:style-name="T2">(71/23) </text:span> ⲛⲉ ⲛ̅ⲥⲛⲟ̣[ϥ]ⲏ%0 8+- ]ⲉ <text:line-break/><text:span text:style-name="T1"> </text:span><text:span text:style-name="T2">(71/24) </text:span> ϩⲟ ⲉⲃⲟⲗ[ 9+- ].ⲧⲉ <text:line-break/><text:span text:style-name="T1"> </text:span><text:span text:style-name="T2">(71/25) </text:span> ⲛ̅ⲛⲟⲩⲗ[ 10+- ⲕⲱ]ϩ̅ⲧ̅ <text:line-break/><text:span text:style-name="T1"> </text:span><text:span text:style-name="T2">(71/26) </text:span> ⲙ̅ⲛ̅ ⲟⲩⲟ̣.[ 9+- ϩ̅]̅ⲛ̅ ⲛⲉϥ <text:line-break/><text:soft-page-break/><text:span text:style-name="T1"> </text:span><text:span text:style-name="T2">(71/27) </text:span> ϭⲓϫ· ⲧⲟⲧⲉ ⲁⲛ[ⲟⲕ ⲡⲉϫ]ⲁⲓ̈ <text:line-break/><text:span text:style-name="T1"> </text:span><text:span text:style-name="T2">(71/28) </text:span> [ⲛ]ⲁϥ ϫⲉ ⲙ̣̅ⲡⲉϥϣ̣[ⲉ ⲉϩⲣ]ⲁ̣ⲓ̈ ⲉ <text:line-break/><text:span text:style-name="T1"> </text:span><text:span text:style-name="T2">(71/29) </text:span> [ϫ]ⲱⲓ̈ ⲛ̅ϭⲓ ⲫ̣[ⲁ̅ⲓ̅ⲛ̅ⲱ̅ⲯ̅ ⲙ̅ⲡ]ⲉϥ <text:line-break/><text:span text:style-name="T1"> </text:span><text:span text:style-name="T2">(71/30) </text:span> [ⲥ]ⲱⲣ̅ⲙ̅·.[ 8+- ⲛ]ⲁ̣ⲩ ⲉⲩ <text:line-break/><text:span text:style-name="T1"> </text:span><text:span text:style-name="T2">(71/31) </text:span> [ⲣ]ⲱⲙⲉ ⲛ̣[ 10+- ]ϥ· <text:line-break/><text:span text:style-name="T1"> </text:span><text:span text:style-name="T2">(71/32) </text:span> [..]...[ 11+- ]ⲩ̣ <text:line-break/><text:span text:style-name="T1"> </text:span><text:span text:style-name="T2">(71/33) </text:span> [ 14+- ]ⲙ̅ⲛ̅ <text:line-break/><text:span text:style-name="T1"> </text:span><text:span text:style-name="T2">(71/34) </text:span> [ 14+- ]ⲁⲩ <text:line-break/><text:span text:style-name="T1"> </text:span><text:span text:style-name="T2">(71/35) </text:span> [ 14+- ]ⲛ̣ⲁ̣ <text:line-break/><text:span text:style-name="T1"> </text:span><text:span text:style-name="T2">(71/36) </text:span> (3+- Lines lacking) <text:line-break/><text:span text:style-name="T1"> </text:span><text:span text:style-name="T2">(72/16) </text:span> (Lines 1--16 lacking) <text:line-break/><text:span text:style-name="T1"> </text:span><text:span text:style-name="T2">(72/17) </text:span> [ 18+- ]ⲛ̣. <text:line-break/><text:span text:style-name="T1"> </text:span><text:span text:style-name="T2">(72/18) </text:span> .ⲟ̣[ 16+- ]ⲅⲁⲣ̣ ⲉⲧ̣ⲁϥ <text:line-break/><text:span text:style-name="T1"> </text:span><text:span text:style-name="T2">(72/19) </text:span> ϫⲟⲟ̣[ϥ 11+- ].ⲛ ⲫⲁ̅ⲓ̣̅̅ⲛ̅ⲱ̅ⲯ̅ <text:line-break/><text:span text:style-name="T1"> </text:span><text:span text:style-name="T2">(72/20) </text:span> ⲡⲁⲓ̈[ 6+- ].ⲉ[.].ⲁⲓ̈ⲛⲁⲩ ⲉⲣⲟϥ̣ <text:line-break/><text:span text:style-name="T1"> </text:span><text:span text:style-name="T2">(72/21) </text:span> ⲁⲩ[ⲱ ⲡⲉϫⲁϥ] ⲛⲁⲓ̈ ϫⲉ ⲩ̈ⲯ̅ⲓ̅ⲫ̅ⲣ̅ⲟⲛⲏ <text:line-break/><text:span text:style-name="T1"> </text:span><text:span text:style-name="T2">(72/22) </text:span> ⲉⲧ[ⲃⲉ ⲟⲩ ⲕϣⲟⲟ]ⲡ̣ [ⲛ̅]ⲥⲁⲃⲟⲗ ⲙ̅ⲙⲟⲓ̈ <text:line-break/><text:span text:style-name="T1"> </text:span><text:span text:style-name="T2">(72/23) </text:span> ⲟⲩⲱ[ϩ ⲙ̅ⲙⲟⲕ ⲛ̅ⲥⲱⲓ̈·] ⲁⲩⲱ ϯⲛⲁ <text:line-break/><text:span text:style-name="T1"> </text:span><text:span text:style-name="T2">(72/24) </text:span> ⲧ̣ⲁ̣ⲙⲟ̣[ⲕ ⲉⲣⲟⲟⲩ· ⲁⲛ]ⲟⲕ ⲇ̣ⲉ ⲁⲉⲓ <text:line-break/><text:span text:style-name="T1"> </text:span><text:span text:style-name="T2">(72/25) </text:span> ⲟ̣ⲩⲁϩ̅ⲧ̣̅̅ [ⲛ̅ⲥⲱϥ· ⲛⲉⲓ̈]ϣⲟ[ⲟ]ⲡ ⲅⲁⲣ <text:line-break/><text:span text:style-name="T1"> </text:span><text:span text:style-name="T2">(72/26) </text:span> [ⲛ̅]ϩ̣ⲣⲁⲓ̣̈ [ϩ̅ⲛ̅ ⲟⲩⲛⲟϭ] ⲛ̅ϩⲟⲧⲉ̣· ⲁⲩⲱ̣ <text:line-break/><text:span text:style-name="T1"> </text:span><text:span text:style-name="T2">(72/27) </text:span> ⲁ̣ϥⲧⲁ[ⲙⲟⲉⲓ] ⲉⲩ̣ⲡⲏⲅⲏ ⲛ̅ⲥⲛⲟ̣[ϥ] <text:line-break/><text:span text:style-name="T1"> </text:span><text:span text:style-name="T2">(72/28) </text:span> ⲉ̣ⲥϭⲟ̣[ⲗⲡ ⲉⲃⲟⲗ· ⲉⲥ]ϯ ⲕⲱϩ̅ⲧ̣̅̅[ <text:line-break/><text:span text:style-name="T1"> </text:span><text:span text:style-name="T2">(72/29) </text:span> [.]ⲉⲉ[ 9+- ]ⲡⲉϫⲁϥ̣[ <text:line-break/><text:span text:style-name="T1"> </text:span><text:span text:style-name="T2">(72/30) </text:span> [.]ⲉⲁ̣.[ 8+- ]ⲱ̣ⲕ̣ ⲙ̅.[ <text:line-break/><text:span text:style-name="T1"> </text:span><text:span text:style-name="T2">(72/31) </text:span> [..]..[ <text:line-break/><text:span text:style-name="T1"> </text:span><text:span text:style-name="T2">(72/32) </text:span> [.]..[ <text:line-break/><text:span text:style-name="T1"> </text:span><text:span text:style-name="T2">(72/33) </text:span> [..]ⲩ̣ⲛ̣̅[ </text:p>
      <text:p text:style-name="P1"/>
      <text:p text:style-name="P3">( codex XI ) fragments</text:p>
      <text:p text:style-name="P2"><text:span text:style-name="T1"> </text:span><text:span text:style-name="T2">(1/1) </text:span> ⲛ̅[ <text:line-break/><text:span text:style-name="T1"> </text:span><text:span text:style-name="T2">(1/2) </text:span> ⲡϥ.[ <text:line-break/><text:span text:style-name="T1"> </text:span><text:span text:style-name="T2">(1/3) </text:span> ⲛ̣ⲉⲥ̣[ <text:line-break/><text:span text:style-name="T1"> </text:span><text:span text:style-name="T2">(1/4) </text:span> .[ <text:line-break/><text:span text:style-name="T1"> </text:span><text:span text:style-name="T2">(1/5) </text:span> ⲛ̅ⲉ̣[ <text:line-break/><text:span text:style-name="T1"> </text:span><text:span text:style-name="T2">(1/6) </text:span> ⲱ[ (b) ].[ <text:line-break/><text:span text:style-name="T1"> </text:span><text:span text:style-name="T2">(1/7) </text:span> ]ⲙⲉⲛ <text:line-break/><text:span text:style-name="T1"> </text:span><text:span text:style-name="T2">(1/8) </text:span> ⲁ]ⲩ̣ⲱ ⲁⲥ <text:line-break/><text:span text:style-name="T1"> </text:span><text:span text:style-name="T2">(1/9) </text:span> ].ⲉ̣ <text:line-break/><text:span text:style-name="T1"> </text:span><text:span text:style-name="T2">(1/10) </text:span> ].ⲧ̣ⲁ̣ⲣ <text:line-break/><text:span text:style-name="T1"> </text:span><text:span text:style-name="T2">(1/11) </text:span> ]ⲉ̣ⲛ <text:line-break/><text:span text:style-name="T1"> </text:span><text:span text:style-name="T2">(1/12) </text:span> ].ϥ̣ <text:line-break/><text:span text:style-name="T1"> </text:span><text:span text:style-name="T2">(8/1) </text:span> ]ⲧ̣̅̅ϥ̅ ⲇ.[ <text:line-break/><text:span text:style-name="T1"> </text:span><text:span text:style-name="T2">(8/2) </text:span> ]ⲧⲁⲉ ⲁϩ[ <text:line-break/><text:span text:style-name="T1"> </text:span><text:span text:style-name="T2">(8/3) </text:span> ].ⲛ̅[ <text:line-break/><text:span text:style-name="T1"> </text:span><text:span text:style-name="T2">(8/4) </text:span> ]ⲛ̣ϯ̣[ (b) ⲉ]ⲧ̣ⲙ̣ⲙ̣[ⲉⲩ <text:line-break/><text:span text:style-name="T1"> </text:span><text:span text:style-name="T2">(8/5) </text:span> ]ⲛⲧⲁⲩⲡ[ <text:line-break/><text:span text:style-name="T1"> </text:span><text:span text:style-name="T2">(8/6) </text:span> ].[..]ϥ̅ ϩ[ <text:line-break/><text:span text:style-name="T1"> </text:span><text:span text:style-name="T2">(8/7) </text:span> ]ⲱⲡ[ <text:line-break/><text:span text:style-name="T1"> </text:span><text:span text:style-name="T2">(8/8) </text:span> ].[ <text:line-break/><text:span text:style-name="T1"> </text:span><text:span text:style-name="T2">(9/1) </text:span> ].[ <text:line-break/><text:span text:style-name="T1"> </text:span><text:span text:style-name="T2">(9/2) </text:span> ]ⲧ̣ⲃ[ <text:line-break/><text:span text:style-name="T1"> </text:span><text:span text:style-name="T2">(9/3) </text:span> ]ϥ̅ ⲁϫ[ⲛ̅ <text:line-break/><text:span text:style-name="T1"> </text:span><text:span text:style-name="T2">(9/4) </text:span> ]ⲱⲙ[ <text:line-break/><text:span text:style-name="T1"> </text:span><text:span text:style-name="T2">(9/5) </text:span> ]ⲛ̣̅ⲡ̣[ (b) ]ⲏ̣ⲣ̣ⲉ[ <text:line-break/><text:span text:style-name="T1"> </text:span><text:span text:style-name="T2">(9/6) </text:span> ]ⲏ̣ⲣⲓ[ <text:line-break/><text:span text:style-name="T1"> </text:span><text:span text:style-name="T2">(9/7) </text:span> ]ⲡⲉ ⲡ̣[ <text:line-break/><text:span text:style-name="T1"> </text:span><text:span text:style-name="T2">(9/8) </text:span> ]ⲉ̣ ⲁⲣⲁ̣[ <text:line-break/><text:span text:style-name="T1"> </text:span><text:span text:style-name="T2">(9/9) </text:span> ].ⲡ[ <text:line-break/><text:span text:style-name="T1"> </text:span><text:span text:style-name="T2">(10/1) </text:span> ]ⲓⲁ ⲉⲥ̣[ <text:line-break/><text:span text:style-name="T1"> </text:span><text:span text:style-name="T2">(10/2) </text:span> ]ⲛ̅ⲥ.[ <text:line-break/><text:span text:style-name="T1"> </text:span><text:span text:style-name="T2">(10/3) </text:span> ]ⲛⲉ̣[ <text:line-break/><text:span text:style-name="T1"> </text:span><text:span text:style-name="T2">(10/4) </text:span> ]ⲛ̅ ⲙ[ <text:line-break/><text:span text:style-name="T1"> </text:span><text:span text:style-name="T2">(10/5) </text:span> ].[ (b) ]ⲡⲗⲟⲅ̣[ⲟⲥ <text:line-break/><text:span text:style-name="T1"> </text:span><text:span text:style-name="T2">(10/6) </text:span> ⲡ]ⲧ̣ⲟⲡ̣[ⲟⲥ <text:line-break/><text:span text:style-name="T1"> </text:span><text:span text:style-name="T2">(10/7) </text:span> ]ⲙ̣ⲉ̣[ <text:line-break/><text:span text:style-name="T1"> </text:span><text:span text:style-name="T2">(10/8) </text:span> ]ⲯⲩⲭ̣[ <text:line-break/><text:span text:style-name="T1"> </text:span><text:span text:style-name="T2">(10/9) </text:span> ].[ <text:line-break/><text:span text:style-name="T1"> </text:span><text:span text:style-name="T2">(15/1) </text:span> ]ⲙ̅ⲡⲇ.[ <text:line-break/><text:span text:style-name="T1"> </text:span><text:span text:style-name="T2">(15/2) </text:span> ]ⲱ ⲉϥ̣[ <text:line-break/><text:span text:style-name="T1"> </text:span><text:span text:style-name="T2">(15/3) </text:span> ]ⲁ̣ⲧⲁ[ (b) ].[.].[ <text:line-break/><text:span text:style-name="T1"> </text:span><text:span text:style-name="T2">(15/4) </text:span> ]ⲛ̣̅ⲅⲁⲣ ⲉⲓ[ <text:line-break/><text:span text:style-name="T1"> </text:span><text:span text:style-name="T2">(15/5) </text:span> ]ⲛ̣ⲟⲩ[ <text:line-break/><text:span text:style-name="T1"> </text:span><text:span text:style-name="T2">(15/6) </text:span> ].̅ⲡ̣[ <text:line-break/><text:span text:style-name="T1"> </text:span><text:span text:style-name="T2">(16/1) </text:span> (16̈21) ⲉⲓ ⲛ̣[ <text:line-break/><text:span text:style-name="T1"> </text:span><text:span text:style-name="T2">(16/2) </text:span> (16̈21) ⲉⲓ ⲛ̅ϣ̅ <text:line-break/><text:span text:style-name="T1"> </text:span><text:span text:style-name="T2">(16/3) </text:span> (16̈21) [.].ⲛⲛ̅[ <text:line-break/><text:soft-page-break/><text:span text:style-name="T1"> </text:span><text:span text:style-name="T2">(16/4) </text:span> (16̈21) ⲁⲩⲱ.[ <text:line-break/><text:span text:style-name="T1"> </text:span><text:span text:style-name="T2">(16/5) </text:span> (16̈21) .̅.[ <text:line-break/><text:span text:style-name="T1"> </text:span><text:span text:style-name="T2">(17/1) </text:span> (16̈21) ]ⲕ̣ⲧ̅ⲛ̅ <text:line-break/><text:span text:style-name="T1"> </text:span><text:span text:style-name="T2">(17/2) </text:span> (16̈21) ]ⲧ̣ⲙ. <text:line-break/><text:span text:style-name="T1"> </text:span><text:span text:style-name="T2">(17/3) </text:span> (16̈21) ].ⲡⲉ <text:line-break/><text:span text:style-name="T1"> </text:span><text:span text:style-name="T2">(17/4) </text:span> (16̈21) ].̅ <text:line-break/><text:span text:style-name="T1"> </text:span><text:span text:style-name="T2">(19/1) </text:span> ].ⲡ[ <text:line-break/><text:span text:style-name="T1"> </text:span><text:span text:style-name="T2">(19/2) </text:span> ]ⲁⲩⲱ[ <text:line-break/><text:span text:style-name="T1"> </text:span><text:span text:style-name="T2">(19/3) </text:span> ]ⲣ̣ⲱ̣[ (b) ]ⲡⲉ[ <text:line-break/><text:span text:style-name="T1"> </text:span><text:span text:style-name="T2">(19/4) </text:span> ]ⲩⲱ.[ <text:line-break/><text:span text:style-name="T1"> </text:span><text:span text:style-name="T2">(19/5) </text:span> ].̅[ <text:line-break/><text:span text:style-name="T1"> </text:span><text:span text:style-name="T2">(23/1) </text:span> ⲁ̣[ <text:line-break/><text:span text:style-name="T1"> </text:span><text:span text:style-name="T2">(23/2) </text:span> ⲡ̣[ (b) ⲧ̣[ <text:line-break/><text:span text:style-name="T1"> </text:span><text:span text:style-name="T2">(23/3) </text:span> ]. <text:line-break/><text:span text:style-name="T1"> </text:span><text:span text:style-name="T2">(23/4) </text:span> ]ϩ̣ⲉ <text:line-break/><text:span text:style-name="T1"> </text:span><text:span text:style-name="T2">(23/5) </text:span> ].̅ <text:line-break/><text:span text:style-name="T1"> </text:span><text:span text:style-name="T2">(23/6) </text:span> ]. <text:line-break/><text:span text:style-name="T1"> </text:span><text:span text:style-name="T2">(25/1) </text:span> ].ⲛ̣ⲙ̣[ <text:line-break/><text:span text:style-name="T1"> </text:span><text:span text:style-name="T2">(25/2) </text:span> ]ⲉ̣ϥ̅ ⲛ̅[ <text:line-break/><text:span text:style-name="T1"> </text:span><text:span text:style-name="T2">(25/3) </text:span> ].ⲩ̣[ (b) ]ⲙ̣ⲡ̣[ <text:line-break/><text:span text:style-name="T1"> </text:span><text:span text:style-name="T2">(25/4) </text:span> ]ⲗ̣ⲟ.[ <text:line-break/><text:span text:style-name="T1"> </text:span><text:span text:style-name="T2">(25/5) </text:span> ]ⲱ̣[ <text:line-break/><text:span text:style-name="T1"> </text:span><text:span text:style-name="T2">(26/1) </text:span> ].[ <text:line-break/><text:span text:style-name="T1"> </text:span><text:span text:style-name="T2">(26/2) </text:span> ].ⲕⲁ[ <text:line-break/><text:span text:style-name="T1"> </text:span><text:span text:style-name="T2">(26/3) </text:span> ].[ (b) ]ⲙ̣ⲟ[ <text:line-break/><text:span text:style-name="T1"> </text:span><text:span text:style-name="T2">(26/4) </text:span> ].ⲱ̣[ <text:line-break/><text:span text:style-name="T1"> </text:span><text:span text:style-name="T2">(28/1) </text:span> ]ⲙ̣ⲓ[ <text:line-break/><text:span text:style-name="T1"> </text:span><text:span text:style-name="T2">(28/2) </text:span> ]ⲁ̣[ (b) ]ⲱ̣[ <text:line-break/><text:span text:style-name="T1"> </text:span><text:span text:style-name="T2">(28/3) </text:span> ]ⲁϩ̣[ <text:line-break/><text:span text:style-name="T1"> </text:span><text:span text:style-name="T2">(31/1) </text:span> ]ⲉ̣[ <text:line-break/><text:span text:style-name="T1"> </text:span><text:span text:style-name="T2">(31/2) </text:span> ]ⲱ[ <text:line-break/><text:span text:style-name="T1"> </text:span><text:span text:style-name="T2">(31/3) </text:span> ]ⲩ.̅[ (b) ].ⲉ̣[ <text:line-break/><text:span text:style-name="T1"> </text:span><text:span text:style-name="T2">(31/4) </text:span> ]ⲉ̣ⲭ̣[ <text:line-break/><text:span text:style-name="T1"> </text:span><text:span text:style-name="T2">(31/5) </text:span> ]ⲁ̣ⲩ[ <text:line-break/><text:span text:style-name="T1"> </text:span><text:span text:style-name="T2">(32/1) </text:span> [ ]ⲩ̣ⲧ̣[ <text:line-break/><text:span text:style-name="T1"> </text:span><text:span text:style-name="T2">(32/2) </text:span> ⲛⲁⲓ̣ ⲉⲧⲁⲓ[̈]ϫⲉ̣[ <text:line-break/><text:span text:style-name="T1"> </text:span><text:span text:style-name="T2">(32/3) </text:span> ⲁⲩⲱ ⲁⲉⲓⲛ[ⲁⲩ <text:line-break/><text:span text:style-name="T1"> </text:span><text:span text:style-name="T2">(32/4) </text:span> ⲥⲛⲏ̣ⲩ [ⲙ]ⲛ̅ ⲛ̣[ <text:line-break/><text:span text:style-name="T1"> </text:span><text:span text:style-name="T2">(32/5) </text:span> .ⲣ.[ <text:line-break/><text:span text:style-name="T1"> </text:span><text:span text:style-name="T2">(32/6) </text:span> ⲛ̣[ <text:line-break/><text:span text:style-name="T1"> </text:span><text:span text:style-name="T2">(32/7) </text:span> .[ (b) [ 7+- ]ⲟ ⲉⲩ̣[ 7+- ]ⲩ̣ <text:line-break/><text:span text:style-name="T1"> </text:span><text:span text:style-name="T2">(32/8) </text:span> [ 8+- ϩ]ⲣⲁⲓ̈ ϩⲛ̣̅ ⲛⲉⲓ̈ⲥⲧⲟ <text:line-break/><text:span text:style-name="T1"> </text:span><text:span text:style-name="T2">(32/9) </text:span> [ⲗⲏ.....ⲁⲩ]ⲱ ⲁⲉⲓⲧⲁⲙⲟⲟⲩ <text:line-break/><text:span text:style-name="T1"> </text:span><text:span text:style-name="T2">(32/10) </text:span> [ⲉⲛⲁⲓ̈ ⲛ̅ⲧⲁⲉⲓ]ⲛ̣ⲁⲩ̣ ⲉⲣⲟⲟⲩ ⲛ̅ <text:line-break/><text:span text:style-name="T1"> </text:span><text:span text:style-name="T2">(32/11) </text:span> [ 13+- ⲟ]ⲩⲛⲟϭ <text:line-break/><text:span text:style-name="T1"> </text:span><text:span text:style-name="T2">(32/12) </text:span> [ 15+- ].[.]ⲧ̣ⲟⲛ̣ <text:line-break/><text:span text:style-name="T1"> </text:span><text:span text:style-name="T2">(32/13) </text:span> [ 16+- ]ⲉ̣ⲛ̣ <text:line-break/><text:soft-page-break/><text:span text:style-name="T1"> </text:span><text:span text:style-name="T2">(32/14) </text:span> [ 16+- ]ⲟ̣[ <text:line-break/><text:span text:style-name="T1"> </text:span><text:span text:style-name="T2">(33/1) </text:span> ]ϣ̣ⲟϫ̣[ⲛⲉ <text:line-break/><text:span text:style-name="T1"> </text:span><text:span text:style-name="T2">(33/2) </text:span> ]ⲃ̣ⲁⲃϩ[ <text:line-break/><text:span text:style-name="T1"> </text:span><text:span text:style-name="T2">(33/3) </text:span> ].ⲕⲗⲟⲟⲗⲉ̣[ <text:line-break/><text:span text:style-name="T1"> </text:span><text:span text:style-name="T2">(33/4) </text:span> ]ϯ̣ⲕ̣ⲗⲟⲟⲗⲉ̣ ⲛ̣̅[ <text:line-break/><text:span text:style-name="T1"> </text:span><text:span text:style-name="T2">(33/5) </text:span> ⲁ]ⲓ̣̈ⲣ̣ⲁ̣ϣ̣[ⲉ (b) ]..[ <text:line-break/><text:span text:style-name="T1"> </text:span><text:span text:style-name="T2">(33/6) </text:span> ]ⲉϩⲉⲛ[ <text:line-break/><text:span text:style-name="T1"> </text:span><text:span text:style-name="T2">(33/7) </text:span> ⲁ]ⲩ̣ϫⲓⲧ’ ⲉϩ̣[ⲣⲁⲓ̈ ⲉ <text:line-break/><text:span text:style-name="T1"> </text:span><text:span text:style-name="T2">(33/8) </text:span> ]ⲁⲩⲱ ⲡⲉϫ̣ⲁⲩ̣[ <text:line-break/><text:span text:style-name="T1"> </text:span><text:span text:style-name="T2">(33/9) </text:span> ⲩ̈ⲯ̅ⲓ̅ⲫ̅ⲣ̅ⲟ̅]̅ⲛ̣̅̅ⲏ̅ ⲉⲓⲥ ϩⲏ̣[ⲏⲧⲉ <text:line-break/><text:span text:style-name="T1"> </text:span><text:span text:style-name="T2">(34/1) </text:span> ]ⲉ[.].[ <text:line-break/><text:span text:style-name="T1"> </text:span><text:span text:style-name="T2">(34/2) </text:span> ].ⲁ̣ⲩ̣ⲱ̣.[ <text:line-break/><text:span text:style-name="T1"> </text:span><text:span text:style-name="T2">(34/3) </text:span> ]ϣⲟ̣ⲣ̅ⲡ̅ ⲛ̅.[ <text:line-break/><text:span text:style-name="T1"> </text:span><text:span text:style-name="T2">(34/4) </text:span> ⲡ]ⲱⲧ̣ ⲉⲃⲟⲗ̣[ <text:line-break/><text:span text:style-name="T1"> </text:span><text:span text:style-name="T2">(34/5) </text:span> ⲙ̅ⲙ]ⲟ[ⲟ]ⲩ̣.[ (b) ]..[ <text:line-break/><text:span text:style-name="T1"> </text:span><text:span text:style-name="T2">(34/6) </text:span> ⲁ]ⲛ̣ⲟ̣ⲕ ⲇ̣ⲉ.[ <text:line-break/><text:span text:style-name="T1"> </text:span><text:span text:style-name="T2">(34/7) </text:span> ⲙ̅]ⲙ̣ⲟⲟⲩ ⲁ[ <text:line-break/><text:span text:style-name="T1"> </text:span><text:span text:style-name="T2">(34/8) </text:span> ]ⲉϣⲓⲛⲉ.[ <text:line-break/><text:span text:style-name="T1"> </text:span><text:span text:style-name="T2">(34/9) </text:span> ]ⲁ̣ⲓ̣[ⲧ]ⲓ̣ⲟⲛ[ <text:line-break/><text:span text:style-name="T1"> </text:span><text:span text:style-name="T2">(34/10) </text:span> (No margin visible.)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4:26:59.262975100</meta:creation-date>
    <dc:date>2026-03-24T15:51:10.558629500</dc:date>
    <meta:editing-duration>PT1H24M11S</meta:editing-duration>
    <meta:editing-cycles>1</meta:editing-cycles>
    <meta:document-statistic meta:table-count="0" meta:image-count="0" meta:object-count="0" meta:page-count="53" meta:paragraph-count="20" meta:word-count="11247" meta:character-count="78307" meta:non-whitespace-character-count="60365"/>
    <meta:generator>LibreOffice/26.2.1.2$Windows_X86_64 LibreOffice_project/620$Build-2</meta:generator>
  </office:meta>
</office:document-meta>
</file>