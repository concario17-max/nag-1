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P4" style:family="paragraph" style:parent-style-name="Standard">
      <style:paragraph-properties fo:break-before="page"/>
      <style:text-properties style:font-name="Antinoou" officeooo:paragraph-rsid="000259b5"/>
    </style:style>
    <style:style style:name="P5" style:family="paragraph" style:parent-style-name="Text_20_body">
      <style:text-properties style:font-name="Antinoou" officeooo:paragraph-rsid="000259b5"/>
    </style:style>
    <style:style style:name="P6" style:family="paragraph" style:parent-style-name="Standard">
      <style:text-properties style:font-name="Antinoou" officeooo:paragraph-rsid="000259b5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X ) Melchizedek</text:p>
      <text:p text:style-name="P2"><text:span text:style-name="T1"> </text:span><text:span text:style-name="T2">(1/1) </text:span> ⲙ̅ⲉ̅ⲗ̅ϫ̣̅̅ⲓ̣̅̅ⲥ̣̅̅[̅ⲉ̅ⲇ̅ⲉ̅ⲕ̅’̅]̅ <text:line-break/><text:span text:style-name="T1"> </text:span><text:span text:style-name="T2">(1/2) </text:span> ⲓⲏⲥⲟⲩⲥ ⲡⲉⲭ̅ⲥ̅ ⲡϣⲏ[ⲣⲉ ⲙ̅ⲡⲛⲟⲩ]‐ <text:line-break/><text:span text:style-name="T1"> </text:span><text:span text:style-name="T2">(1/3) </text:span> [ⲧⲉ.].[....] ⲉⲃⲟⲗ̣ ϩ̣[ⲛ̅ <text:line-break/><text:span text:style-name="T1"> </text:span><text:span text:style-name="T2">(1/4) </text:span> (1 line missing) <text:line-break/><text:span text:style-name="T1"> </text:span><text:span text:style-name="T2">(1/5) </text:span> ⲧ̣ⲉ.[......] ⲛⲁⲓⲱⲛ̣ ⲉ̣ⲓ̣ⲛ[ⲁϫⲱ] <text:line-break/><text:span text:style-name="T1"> </text:span><text:span text:style-name="T2">(1/6) </text:span> ⲛ̅ⲛⲁⲓ̈ⲱ̣ⲛ ⲧ̣ⲏ̣ⲣⲟ̣ⲩ ⲁⲩ̣[ⲱ] ϩⲙ̣̅ <text:line-break/><text:span text:style-name="T1"> </text:span><text:span text:style-name="T2">(1/7) </text:span> ⲡⲟⲩⲁ ⲡⲟⲩⲁ ⲛ̅ⲛⲁⲓ̣ⲱ̣[ⲛ ⲉⲓ]ⲛ[ⲁϫⲉ] <text:line-break/><text:span text:style-name="T1"> </text:span><text:span text:style-name="T2">(1/8) </text:span> [ⲧ]ⲫⲩⲥⲓⲥ ⲙ̅ⲡ̣ⲁⲓ̣ⲱⲛ̣ [ⲟⲩ]ⲁ̣ϣ‐ <text:line-break/><text:span text:style-name="T1"> </text:span><text:span text:style-name="T2">(1/9) </text:span> ⲡⲉ· ⲁⲩⲱ ⲧⲙⲛ̅ⲧ’ϣ̣[ⲃ]ⲏ̣ⲣ̣ⲉ ⲙⲛ̅ [ⲧⲙⲛ̅ⲧ’]‐ <text:line-break/><text:span text:style-name="T1"> </text:span><text:span text:style-name="T2">(1/10) </text:span> ⲭⲣⲏⲥⲧⲟⲥ ⲉⲓⲛⲁⲧⲁ[ⲁ]ⲩ̣ ϩⲓ̅[ⲱⲧ’] <text:line-break/><text:span text:style-name="T1"> </text:span><text:span text:style-name="T2">(1/11) </text:span> ⲛ̅ϣⲧⲏⲛ̣· ⲱ͂ ⲡⲥⲟⲛ.[..]ⲛ̣̅[ <text:line-break/><text:span text:style-name="T1"> </text:span><text:span text:style-name="T2">(1/12) </text:span> [ 9+- ]..[ <text:line-break/><text:span text:style-name="T1"> </text:span><text:span text:style-name="T2">(1/13) </text:span> (2 lines missing) <text:line-break/><text:span text:style-name="T1"> </text:span><text:span text:style-name="T2">(1/14) </text:span> [ 8+- ]ⲙ̣ⲉ[ <text:line-break/><text:span text:style-name="T1"> </text:span><text:span text:style-name="T2">(1/15) </text:span> [ 8+- ]ⲱ ⲛ̅[ <text:line-break/><text:span text:style-name="T1"> </text:span><text:span text:style-name="T2">(1/16) </text:span> [.....]...ⲙⲛ̅..[ <text:line-break/><text:span text:style-name="T1"> </text:span><text:span text:style-name="T2">(1/17) </text:span> [.....].ϫ[..]ⲁϥ ..[ <text:line-break/><text:span text:style-name="T1"> </text:span><text:span text:style-name="T2">(1/18) </text:span> [..ⲉⲃⲟ]ⲗ̣ ⲛ̣̅[ⲧⲟ]ⲩϩ̣ⲁ̣ⲏ [..]ⲛ̣ⲉ[ <text:line-break/><text:span text:style-name="T1"> </text:span><text:span text:style-name="T2">(1/19) </text:span> [....] ⲁ̣ⲩⲱ ϥⲛⲁ[ϭ̣ⲱⲗ]ⲉⲡ̣ [ⲉ]‐ <text:line-break/><text:span text:style-name="T1"> </text:span><text:span text:style-name="T2">(1/20) </text:span> [ⲃⲟⲗ ⲛⲁⲩ] ⲛ̅ⲧⲙⲉ·.[..]ⲙ̣ⲟ̣[ <text:line-break/><text:span text:style-name="T1"> </text:span><text:span text:style-name="T2">(1/21) </text:span> [ 9+- ].[ <text:line-break/><text:span text:style-name="T1"> </text:span><text:span text:style-name="T2">(1/22) </text:span> (1 line missing) <text:line-break/><text:span text:style-name="T1"> </text:span><text:span text:style-name="T2">(1/30) </text:span> [ 7+- ] ϩ̣ⲛ̣̅ ⲁ̣[ <text:line-break/><text:span text:style-name="T1"> </text:span><text:span text:style-name="T2">(1/31) </text:span> [....ⲡⲁ]ⲣ̣ⲟ̣ⲓⲙ̣[ⲓⲁ...].[ <text:line-break/><text:span text:style-name="T1"> </text:span><text:span text:style-name="T2">(1/32) </text:span> [ 11+- ].[.]..[ <text:line-break/><text:span text:style-name="T1"> </text:span><text:span text:style-name="T2">(1/33) </text:span> (+-2 lines missing) <text:line-break/><text:span text:style-name="T1"> </text:span><text:span text:style-name="T2">(2/1) </text:span> [...ⲛ̅ϣ]ⲟⲣⲡ̅’ ϩⲛ̅ ϩⲉⲛ̣ⲡ̣ⲁⲣⲁⲃⲟ̣ⲗ̣[ⲏ] <text:line-break/><text:span text:style-name="T1"> </text:span><text:span text:style-name="T2">(2/2) </text:span> [ⲙⲛ̅ ϩⲉⲛⲁⲓ]ⲛ̣ⲓ̣ⲅⲙⲁ̣ [ <text:line-break/><text:span text:style-name="T1"> </text:span><text:span text:style-name="T2">(2/3) </text:span> (1 line missing) <text:line-break/><text:span text:style-name="T1"> </text:span><text:span text:style-name="T2">(2/4) </text:span> [......] ⲛ̣ⲣ[ 7+- ⲧ]ⲁ̣ϣ̣[ⲉ]‐ <text:line-break/><text:span text:style-name="T1"> </text:span><text:span text:style-name="T2">(2/5) </text:span> [ⲟ]ⲉⲓϣ ⲙ̣̅ⲙⲟⲟⲩ ⲡ̣ⲙⲟⲩ ⲛⲁϣⲧ̣[ⲟⲣ]‐ <text:line-break/><text:span text:style-name="T1"> </text:span><text:span text:style-name="T2">(2/6) </text:span> [ⲧ]ⲣ̅ ⲁⲩⲱ̣ ϥⲛⲁϭⲱⲛⲧ̅’· ⲟⲩ ⲙⲟⲛⲟ[ⲛ] <text:line-break/><text:span text:style-name="T1"> </text:span><text:span text:style-name="T2">(2/7) </text:span> [ⲛ̅]ⲧⲟϥ̣ [ⲟ]ⲩ̣ⲁⲁϥ· ⲁⲗⲗⲁ ⲛⲉϥⲕⲉ[ϣⲃⲏⲣ] <text:line-break/><text:span text:style-name="T1"> </text:span><text:span text:style-name="T2">(2/8) </text:span> [ⲛ̅]ⲕⲟⲥⲙ[ⲟ]ⲕⲣⲁⲧⲱⲣ· ⲛ̅ⲁⲣⲭⲱⲛ [ⲙⲛ̅] <text:line-break/><text:span text:style-name="T1"> </text:span><text:span text:style-name="T2">(2/9) </text:span> [ⲛ̅]ⲁⲣⲭⲏ ⲙ̣ⲛ̅ ⲛ̅ⲉⲝⲟⲩⲥⲓⲁ· ⲛ̅ⲛⲟⲩ[ⲧⲉ] <text:line-break/><text:span text:style-name="T1"> </text:span><text:span text:style-name="T2">(2/10) </text:span> [ⲛ̅]ϩⲓ̅ⲁ̣ⲙ̣[ⲉ] ⲙⲛ̅ ⲛ̅ⲛⲟⲩⲧⲉ ⲛ̅ϩⲟⲟⲩ[ⲧ’] <text:line-break/><text:span text:style-name="T1"> </text:span><text:span text:style-name="T2">(2/11) </text:span> [ⲙ]ⲛ̅ ⲛ̣̅[ⲁⲣⲭ]ⲁⲅ’ⲅⲉⲗ̣ⲟⲥ ⲁⲩⲱ ⲛ̣̅[ <text:line-break/><text:span text:style-name="T1"> </text:span><text:span text:style-name="T2">(2/12) </text:span> (3 lines missing) <text:line-break/><text:span text:style-name="T1"> </text:span><text:span text:style-name="T2">(2/15) </text:span> [ 7+- ].ⲁⲩ[ <text:line-break/><text:span text:style-name="T1"> </text:span><text:span text:style-name="T2">(2/16) </text:span> [......ⲧ]ⲏ̣ⲣⲟⲩ[ <text:line-break/><text:span text:style-name="T1"> </text:span><text:span text:style-name="T2">(2/17) </text:span> [ⲛ̅ⲕⲟⲥ]ⲙⲟⲕⲣⲁⲧ[ⲱ]ⲣ̣[ <text:line-break/><text:span text:style-name="T1"> </text:span><text:span text:style-name="T2">(2/18) </text:span> [..ⲧ]ⲏ̣ⲣⲟ̣ⲩ ⲁⲩⲱ ⲛ̣[ <text:line-break/><text:span text:style-name="T1"> </text:span><text:span text:style-name="T2">(2/19) </text:span> [...ⲧⲏ]ⲣⲟⲩ ⲁⲩⲱ ⲛ[ <text:line-break/><text:span text:style-name="T1"> </text:span><text:span text:style-name="T2">(2/20) </text:span> [ⲧ]ⲏ̣ⲣⲟⲩ ⲥⲉⲛⲁϫⲟⲟ̣[ⲥ....ⲉⲧⲃⲏ]‐ <text:line-break/><text:span text:style-name="T1"> </text:span><text:span text:style-name="T2">(2/21) </text:span> [ⲏ]ⲧϥ̅· ⲁⲩⲱ ⲉⲧⲃⲉ [ <text:line-break/><text:span text:style-name="T1"> </text:span><text:span text:style-name="T2">(2/22) </text:span> [......] ⲁⲩⲱ̣ [ <text:line-break/><text:span text:style-name="T1"> </text:span><text:span text:style-name="T2">(2/23) </text:span> (2 lines missing) <text:line-break/><text:soft-page-break/><text:span text:style-name="T1"> </text:span><text:span text:style-name="T2">(2/25) </text:span> [...] ⲥ̣ⲉⲛⲁⲉ[ 8+- ⲙⲩⲥ]‐ <text:line-break/><text:span text:style-name="T1"> </text:span><text:span text:style-name="T2">(2/26) </text:span> [ⲧ]ⲏⲣⲓⲟⲛ· ⲉⲧ’ϩⲏ̣[ⲡ <text:line-break/><text:span text:style-name="T1"> </text:span><text:span text:style-name="T2">(2/27) </text:span> [.]ⲉⲛⲉ.[ <text:line-break/><text:span text:style-name="T1"> </text:span><text:span text:style-name="T2">(2/28) </text:span> (+-2 lines missing) <text:line-break/><text:span text:style-name="T1"> </text:span><text:span text:style-name="T2">(3/1) </text:span> [ 16+- ]ⲉⲡ̣ <text:line-break/><text:span text:style-name="T1"> </text:span><text:span text:style-name="T2">(3/2) </text:span> [ 16+- ]..[ <text:line-break/><text:span text:style-name="T1"> </text:span><text:span text:style-name="T2">(3/3) </text:span> [ 10+- ]ⲗ̣ⲟ̣ⲛ ⲉ̣[ⲃ]ⲟ̣ⲗ ϩ[ⲛ̅] <text:line-break/><text:span text:style-name="T1"> </text:span><text:span text:style-name="T2">(3/4) </text:span> [ 8+- ]ⲡ̣ⲧⲏⲣϥ̅· ⲥ[ⲉ]ⲛⲁ[ <text:line-break/><text:span text:style-name="T1"> </text:span><text:span text:style-name="T2">(3/5) </text:span> [ 8+- ]ⲡ̣ⲁⲓ̈ ⲉⲣⲉⲛⲇ̣ⲓⲕⲟ̣‐ <text:line-break/><text:span text:style-name="T1"> </text:span><text:span text:style-name="T2">(3/6) </text:span> [ⲗⲟⲅⲟⲥ ⲧ]ⲟⲙ̣ⲥϥ̅ ϩⲛ̅ ⲟⲩⲁⲥⲁ̣[ⲓ] <text:line-break/><text:span text:style-name="T1"> </text:span><text:span text:style-name="T2">(3/7) </text:span> [ⲥⲉⲛⲁ]ⲙ̣ⲟⲩⲧⲉ ⲉⲣⲟϥ ϫⲉ ⲡⲣⲱ̣‐ <text:line-break/><text:span text:style-name="T1"> </text:span><text:span text:style-name="T2">(3/8) </text:span> [ⲙⲉ ⲛ̅ⲁ]ⲥ̣ⲉⲃⲏⲥ ⲙ̅ⲡⲁⲣⲁⲛⲟⲙ[ⲟ]ⲥ <text:line-break/><text:span text:style-name="T1"> </text:span><text:span text:style-name="T2">(3/9) </text:span> [ⲛ̅ⲁⲕⲁⲑ]ⲁⲣⲧⲟⲛ· ⲁⲩⲱ̣ [ϩⲙ̅] ⲡ̣ⲙ̣ⲉϩ <text:line-break/><text:span text:style-name="T1"> </text:span><text:span text:style-name="T2">(3/10) </text:span> [ϣⲟⲙⲛ̅ⲧ’] [ⲛ̅]ϩ̣ⲟ̣ⲟⲩ ϥ[ⲛⲁⲧⲱⲱⲛ] <text:line-break/><text:span text:style-name="T1"> </text:span><text:span text:style-name="T2">(3/11) </text:span> [ⲉⲃⲟⲗ ϩⲛ̅ ⲛⲉⲧ’]ⲙ̣ⲟⲟⲩ[ⲧ’ <text:line-break/><text:span text:style-name="T1"> </text:span><text:span text:style-name="T2">(3/12) </text:span> [ 11+- ]ⲗ̣ⲟ̣[ <text:line-break/><text:span text:style-name="T1"> </text:span><text:span text:style-name="T2">(3/13) </text:span> (+-16 lines missing) <text:line-break/><text:span text:style-name="T1"> </text:span><text:span text:style-name="T2">(4/1) </text:span> ⲛ̅ⲣⲙ̅[ <text:line-break/><text:span text:style-name="T1"> </text:span><text:span text:style-name="T2">(4/2) </text:span> ⲙ̣ⲛ̣̅[ <text:line-break/><text:span text:style-name="T1"> </text:span><text:span text:style-name="T2">(4/3) </text:span> ⲙ̣ⲟⲟ[ⲩ.]ⲛ[ 10+- ⲙ̅ⲙⲁ] <text:line-break/><text:span text:style-name="T1"> </text:span><text:span text:style-name="T2">(4/4) </text:span> ⲑⲏⲧⲏⲥ̣ ⲉⲧⲟⲩⲁ̣[ⲁⲃ· ⲁⲩⲱ ϥⲛⲁϭⲱ]‐ <text:line-break/><text:span text:style-name="T1"> </text:span><text:span text:style-name="T2">(4/5) </text:span> ⲗⲉⲡ’ [ⲉ]ⲃ̣ⲟⲗ ⲛⲁⲩ [ⲙ̅ⲡⲗⲟⲅⲟⲥ] <text:line-break/><text:span text:style-name="T1"> </text:span><text:span text:style-name="T2">(4/6) </text:span> ⲉⲧ’ⲧⲛ̣̅ϩⲟ ⲙ̅ⲡ’ⲡ[ⲧⲏ]ⲣ̣[ϥ̅ ⲛ̅ϭⲓ] <text:line-break/><text:span text:style-name="T1"> </text:span><text:span text:style-name="T2">(4/7) </text:span> ⲡⲥⲱ̣ⲧⲏⲣ ⲁⲩϣⲁϫⲉ [ⲇⲉ ϩⲁϩ ⲛ̅]‐ <text:line-break/><text:span text:style-name="T1"> </text:span><text:span text:style-name="T2">(4/8) </text:span> ϣⲁϫⲉ· ⲛ̅ϭⲓ ⲛⲉⲧ’ϩⲛ̅ [ⲙ̅ⲡⲏⲩⲉ] <text:line-break/><text:span text:style-name="T1"> </text:span><text:span text:style-name="T2">(4/9) </text:span> ⲙⲛ̅ ⲛⲉⲧ’ϩⲓ̅ϫⲙ̅ ⲡⲕⲁ[ϩ ⲙⲛ̅ ⲛⲉⲧ’]‐ <text:line-break/><text:span text:style-name="T1"> </text:span><text:span text:style-name="T2">(4/10) </text:span> ϩⲁⲡ̣ⲉ̣[ⲥ]ⲏⲧ’ ⲙ̅ⲡⲕⲁϩ [ <text:line-break/><text:span text:style-name="T1"> </text:span><text:span text:style-name="T2">(4/11) </text:span> ..[....]ⲟⲟⲩ ⲙ̣[ⲛ̅ <text:line-break/><text:span text:style-name="T1"> </text:span><text:span text:style-name="T2">(4/12) </text:span> [......]ⲟⲩ[ <text:line-break/><text:span text:style-name="T1"> </text:span><text:span text:style-name="T2">(4/13) </text:span> [....] ⲛⲁⲩ [ <text:line-break/><text:span text:style-name="T1"> </text:span><text:span text:style-name="T2">(4/14) </text:span> [.....]ⲙⲉ̣[ <text:line-break/><text:span text:style-name="T1"> </text:span><text:span text:style-name="T2">(4/15) </text:span> (+- 16 lines missing) <text:line-break/><text:span text:style-name="T1"> </text:span><text:span text:style-name="T2">(5/1) </text:span> [ⲉⲧ’]ⲛⲁϣⲱⲡⲉ ϩⲙ̅ ⲡⲉϥⲣⲁⲛ· 〈ⲁⲩⲱ〉 <text:line-break/><text:span text:style-name="T1"> </text:span><text:span text:style-name="T2">(5/2) </text:span> [ⲟ]ⲛ ⲥⲉⲛⲁϫⲟⲟⲥ ⲉⲣ̣ⲟ̣ϥ̣ ϫ̣ⲉ ⲟⲩⲁⲧ’‐ <text:line-break/><text:span text:style-name="T1"> </text:span><text:span text:style-name="T2">(5/3) </text:span> [ϫ]ⲡ̣ⲟϥ ⲡⲉ ⲉⲁⲩϫ̣ⲡⲟϥ ⲉϥⲟⲩⲱⲙ <text:line-break/><text:span text:style-name="T1"> </text:span><text:span text:style-name="T2">(5/4) </text:span> [ⲁ]ⲛ̣ ⲉϣϫⲉ ⲉϥⲟⲩⲱⲙ [ⲉ]ϥ̣ⲥⲱ ⲁⲛ <text:line-break/><text:span text:style-name="T1"> </text:span><text:span text:style-name="T2">(5/5) </text:span> ⲉϣϫⲉ ⲉϥⲥⲱ· ⲟⲩⲁⲧ’ⲥⲃ̅ⲃⲏⲧϥ̅ <text:line-break/><text:span text:style-name="T1"> </text:span><text:span text:style-name="T2">(5/6) </text:span> ⲡ̣ⲉ ⲉⲁϥⲥⲃ̅ⲃⲏⲧϥ̅· ⲟⲩⲁⲧ’ⲥⲁⲣⲁⲝ <text:line-break/><text:span text:style-name="T1"> </text:span><text:span text:style-name="T2">(5/7) </text:span> ⲡⲉ ⲉⲁϥϣⲱⲡⲉ ϩⲛ̅ ⲥⲁⲣⲁⲝ· ⲙ̅ⲡϥ̅‐ <text:line-break/><text:span text:style-name="T1"> </text:span><text:span text:style-name="T2">(5/8) </text:span> {ⲉ̅ⲓ̣̅} ⲉⲡ’ⲡⲁⲑⲟⲥ 〈ⲉ〉ⲁϥ{ⲉⲓ} ⲉⲡ’ⲡⲁⲑⲟⲥ· <text:line-break/><text:span text:style-name="T1"> </text:span><text:span text:style-name="T2">(5/9) </text:span> ⲙ̅ⲡϥ̅ⲧⲱⲱⲛ ⲉⲃⲟⲗ ϩⲛ̅ ⲛ̣ⲉ̣ⲧ’ⲙⲟ‐ <text:line-break/><text:span text:style-name="T1"> </text:span><text:span text:style-name="T2">(5/10) </text:span> ⲟⲩⲧ’ 〈ⲉ〉ⲁϥⲧⲱⲱⲛ ⲉⲃⲟⲗ ϩⲛ̅ [ⲛⲉⲧ’]‐ <text:line-break/><text:span text:style-name="T1"> </text:span><text:span text:style-name="T2">(5/11) </text:span> ⲙⲟ[ⲟ]ⲩⲧ’· [ⲥⲉⲛ]ⲁϣⲁϫ̣ⲉ [ⲇⲉ ⲛ̅ⲧⲙⲉ] <text:line-break/><text:span text:style-name="T1"> </text:span><text:span text:style-name="T2">(5/12) </text:span> ⲛ̣̅[ϭⲓ] ⲙ̣̅ⲫ[ⲩⲗⲏ] ⲧ̣ⲏ̣ⲣⲟⲩ [ⲙⲛ̅ ⲛ̅ⲗⲁ]‐ <text:line-break/><text:span text:style-name="T1"> </text:span><text:span text:style-name="T2">(5/13) </text:span> [ⲟⲥ ⲧ]ⲏⲣⲟ̣ⲩ ⲉⲩϫⲓ ⲉⲃ̣ⲟ̣[ⲗ ⲛ̅ϩⲏⲧⲕ’] <text:line-break/><text:span text:style-name="T1"> </text:span><text:span text:style-name="T2">(5/14) </text:span> [ⲛ̅ⲧⲟ]ⲕ’ ϩⲱⲱⲕ’ ⲱ͂ [ⲙⲉⲗϫⲓⲥⲉ]‐ <text:line-break/><text:span text:style-name="T1"> </text:span><text:span text:style-name="T2">(5/15) </text:span> ⲇ̣[ⲉⲕ’] ⲡⲉ̣ⲧ’̣[ⲟ]ⲩⲁⲁ̣ⲃ̣ [ⲡ]ⲁ̣[ⲣⲭⲓⲉ]‐ <text:line-break/><text:soft-page-break/><text:span text:style-name="T1"> </text:span><text:span text:style-name="T2">(5/16) </text:span> ⲣⲉⲩⲥ̣ [ⲛ̅]ⲑ̣ⲉⲗⲡⲓⲥ ⲉⲧ’ϫⲏ[ⲕ’ ⲙⲛ̅] <text:line-break/><text:span text:style-name="T1"> </text:span><text:span text:style-name="T2">(5/17) </text:span> ⲛ̅ⲧⲁ̣[ⲓ̈ⲟ ⲙ̅]ⲡ̣ⲱ̣ⲛϩ̅· ⲁⲛ[ⲟⲕ’ ⲡⲉ]‐ <text:line-break/><text:span text:style-name="T1"> </text:span><text:span text:style-name="T2">(5/18) </text:span> [ⲅⲁⲙⲁⲗ]ⲓ̣ⲏⲗ ⲛ̅ⲧⲁⲩⲧ̣ⲛ̣̅ⲛ̣ⲟ̣[ⲟⲩⲧ’] <text:line-break/><text:span text:style-name="T1"> </text:span><text:span text:style-name="T2">(5/19) </text:span> ⲉ[....]ⲡ̣ ⲛ̅ⲧⲉⲕ’ⲕⲗⲏⲥⲓⲁ ⲛ̅[ⲛ̅]‐ <text:line-break/><text:span text:style-name="T1"> </text:span><text:span text:style-name="T2">(5/20) </text:span> ϣⲏ̣[ⲣⲉ] ⲛ̅ⲥ̅ⲏ̅ⲑ̅· ⲉⲩⲛ̅ⲧⲡⲉ ⲛ̣̅‐ <text:line-break/><text:span text:style-name="T1"> </text:span><text:span text:style-name="T2">(5/21) </text:span> ϩⲉⲛ[ϣ]ⲟ̣ [ⲛ̅]ϣ̣ⲟ̣ ⲁⲩ[ⲱ ϩⲉⲛⲧⲃⲁ] <text:line-break/><text:span text:style-name="T1"> </text:span><text:span text:style-name="T2">(5/22) </text:span> ⲛ̅ⲧⲃⲁ̣ [ⲛ̅ⲛⲁ]ⲓⲱⲛ·.[ <text:line-break/><text:span text:style-name="T1"> </text:span><text:span text:style-name="T2">(5/23) </text:span> ϩⲁ[....ⲟ]ⲩⲥⲓⲁ ⲛ̅ⲛⲁ̣ⲓ̣[ⲱⲛ] <text:line-break/><text:span text:style-name="T1"> </text:span><text:span text:style-name="T2">(5/24) </text:span> [̅ⲁ̅]̅ⲃ̅ⲁ̣̅̅[̅....]̅ⲁⲓⲁⲓ̣̅ ⲁ̅ⲃⲁⲃⲁ̅ ⲡⲁ̣[ <text:line-break/><text:span text:style-name="T1"> </text:span><text:span text:style-name="T2">(5/25) </text:span> [.....]ⲓ̣ⲥ̣ ⲛ̣̅ⲛⲟⲩⲧⲉ ⲛ̅ⲛ.[ <text:line-break/><text:span text:style-name="T1"> </text:span><text:span text:style-name="T2">(5/26) </text:span> [......].ⲕ[...ⲫ]ⲩ̣ⲥⲓⲥ [ <text:line-break/><text:span text:style-name="T1"> </text:span><text:span text:style-name="T2">(5/27) </text:span> [ⲧⲙⲁⲁⲩ] ⲛ̣̅ⲛⲁⲓⲱⲛ [̅ⲧ̅ⲃ̅]̅ⲁ̣̅̅ⲣ̅ⲃ̣̅̅[̅ⲏ̅ⲗ̅ⲱ̅ⲛ̅]̅ <text:line-break/><text:span text:style-name="T1"> </text:span><text:span text:style-name="T2">(5/28) </text:span> [ⲡ]ϣ̣ⲣ̣[ⲡ̅] ⲙ̅ⲙⲓⲥⲉ ⲛ̅[ⲛ̅ⲁ]ⲓ̣[ⲱⲛ] <text:line-break/><text:span text:style-name="T1"> </text:span><text:span text:style-name="T2">(6/1) </text:span> ⲁ̅ⲓ̅ⲑ̣̅̅ⲟ̅ⲯ̅ ⲇ̅ⲟⲝⲟⲙⲉⲇⲱⲛ̅ ⲇⲟ̣ⲙ̣[ <text:line-break/><text:span text:style-name="T1"> </text:span><text:span text:style-name="T2">(6/2) </text:span> ⲡⲁ̣ⲛ̣ⲓ̣ⲱⲟ̣〈ⲩ〉 ⲡ̣ⲓ̅ⲥ̅ ⲡⲉⲭ̅ⲥ̅· ⲛ̅ⲁⲣ[ⲭⲓ]‐ <text:line-break/><text:span text:style-name="T1"> </text:span><text:span text:style-name="T2">(6/3) </text:span> ⲥⲧⲣⲁⲧ[ⲏⲅⲟ]ⲥ ⲛ̅ⲛ̅ⲫⲱ̣ⲥⲧⲏⲣ ⲛ̅[ϭⲟⲙ] <text:line-break/><text:span text:style-name="T1"> </text:span><text:span text:style-name="T2">(6/4) </text:span> ⲁ̅ⲣ̅ⲙ̅ⲟ̅ⲍ̅ⲏ̅ⲗ̅· ⲟ̅ⲣⲱⲓ̈ⲁⲏⲗ̅· ⲇ̅ⲁⲩ[ⲉⲓⲑⲉ]̅ <text:line-break/><text:span text:style-name="T1"> </text:span><text:span text:style-name="T2">(6/5) </text:span> ⲏ̅ⲩ̅ⲏ̅ⲗ̅[̅ⲏ̅ⲑ̅·] ⲁⲩⲱ ⲡⲣⲙ̅ⲛ̅ⲟⲩⲟⲉⲓⲛ̣ <text:line-break/><text:span text:style-name="T1"> </text:span><text:span text:style-name="T2">(6/6) </text:span> ⲛ̅ⲁⲧⲙⲟⲩ ⲛ̅ⲁⲓⲱⲛ ⲡ̅ⲓ̅ⲅ̅ⲉ̅ⲣ̅ⲁ̅ⲇ̅ⲁ̅ⲙ̅ⲁ̅[̅ⲥ̅]̅ⲁ̅ <text:line-break/><text:span text:style-name="T1"> </text:span><text:span text:style-name="T2">(6/7) </text:span> ⲁⲩⲱ ⲡⲛⲟⲩⲧⲉ ⲉⲧⲛⲁⲛⲟⲩϥ ⲛ̅ⲛ̅‐ <text:line-break/><text:span text:style-name="T1"> </text:span><text:span text:style-name="T2">(6/8) </text:span> ⲕⲟⲥⲙⲟⲥ ⲉⲧⲣ̅ ϣⲁⲩ ⲙ̅ⲓ̅ⲣ̅ⲱ̅ⲭ̅ⲉ̅ⲓ̅ⲣ̅ⲟ̅ <text:line-break/><text:span text:style-name="T1"> </text:span><text:span text:style-name="T2">(6/9) </text:span> ⲑ̅ⲉ̅ⲧ̅ⲟ̅ⲩ̅ ⲉⲃⲟⲗ ϩⲓ̅ⲧⲛ̅ ⲓⲥ ⲡⲉⲭⲥ ⲡϣⲏ‐ <text:line-break/><text:span text:style-name="T1"> </text:span><text:span text:style-name="T2">(6/10) </text:span> ⲣⲉ ⲙ̅ⲡⲛⲟⲩⲧⲉ ⲡⲁⲓ̈ ⲁⲛⲟⲕ’ ⲉϯⲧⲁ‐ <text:line-break/><text:span text:style-name="T1"> </text:span><text:span text:style-name="T2">(6/11) </text:span> ϣ̣[ⲉ] ⲟ̣ⲟⲉⲓϣ ⲙ̅ⲙⲟϥ̣ ⲕⲁⲧⲁ ⲑ̣[ⲉ] ⲉⲧⲁϥ <text:line-break/><text:span text:style-name="T1"> </text:span><text:span text:style-name="T2">(6/12) </text:span> [ϭⲙ̅ ⲡ]ϣ̣ⲓ̣ⲛ̣ⲉ ⲛ̅ϭ̣[ⲓ ⲡⲉ]ⲧ’ϣⲟ̣[ⲟ]ⲡ̣ ⲛ̣ⲁ̣ⲙⲉ· <text:line-break/><text:span text:style-name="T1"> </text:span><text:span text:style-name="T2">(6/13) </text:span> [ϩⲛ̅ ⲛⲉ]ⲧ’ϣⲟⲟⲡ’̣ [...].ⲡ.[ <text:line-break/><text:span text:style-name="T1"> </text:span><text:span text:style-name="T2">(6/14) </text:span> [....ϣ]ⲟⲟⲡ’ ⲁⲛ ⲁ̅ⲃ̅ⲉ̅ⲗ̣̅̅ ⲃ̅ⲟⲣⲟ̣[ⲩⲭ̅·] <text:line-break/><text:span text:style-name="T1"> </text:span><text:span text:style-name="T2">(6/15) </text:span> [ϫⲉ ⲉⲩⲉϯ ⲛ]ⲁⲕ’ ⲙ̅ⲡⲥⲟⲟⲩⲛ̣ [ⲛ̅ⲧⲙ]ⲉ <text:line-break/><text:span text:style-name="T1"> </text:span><text:span text:style-name="T2">(6/16) </text:span> [.....]ϣ̣[..]ⲙⲁ ϫⲉ̣ ⲟⲩⲉ̣ⲃ̣[ⲟⲗ] ⲡ̣ⲉ <text:line-break/><text:span text:style-name="T1"> </text:span><text:span text:style-name="T2">(6/17) </text:span> [ϩⲙ̅ ⲡⲅ]ⲉⲛⲟⲥ ⲙ̅ⲡⲁⲣ̣ⲭ[ⲓ]ⲉ̣ⲣ[ⲉ]ⲩⲥ <text:line-break/><text:span text:style-name="T1"> </text:span><text:span text:style-name="T2">(6/18) </text:span> [ⲉⲧⲛ̅ⲧ]ⲡⲉ ⲛ̅ϩⲉⲛ̣ϣ̣[ⲟ ⲛ̅ϣ]ⲟ̣ ⲙⲛ̅ <text:line-break/><text:span text:style-name="T1"> </text:span><text:span text:style-name="T2">(6/19) </text:span> [ϩⲉⲛⲧⲃⲁ] ⲛ̅ⲧⲃⲁ ⲛ̅ⲛⲁ̣ⲓⲱ[ⲛ· ⲥ]ⲉ[ⲟ] ⲛ̅‐ <text:line-break/><text:span text:style-name="T1"> </text:span><text:span text:style-name="T2">(6/20) </text:span> [ⲁⲧ’]ⲥⲟⲟⲩⲛ ⲉⲣⲟϥ ⲛ̅ϭⲓ ⲙ̣̅[ⲡ̅ⲛ̅ⲁ̅] ⲛ̣̅‐ <text:line-break/><text:span text:style-name="T1"> </text:span><text:span text:style-name="T2">(6/21) </text:span> [ⲁ]ⲛ̣ⲧⲓⲕⲉⲓⲙⲉⲛⲟⲛ ⲙⲛ̣̅ ⲡ̣ⲟⲩ‐ <text:line-break/><text:span text:style-name="T1"> </text:span><text:span text:style-name="T2">(6/22) </text:span> [ⲧ]ⲉⲕⲟ· ⲟⲩ ⲙⲟⲛⲟⲛ ⲁⲓ{ⲉ̅ⲓ} ⲉϭⲱ‐ <text:line-break/><text:span text:style-name="T1"> </text:span><text:span text:style-name="T2">(6/23) </text:span> [ⲗⲉⲡ] ⲉ̣ⲃ̣[ⲟⲗ] ⲛⲁⲕ’ ⲛ̅[ⲧ]ⲁⲗⲏⲑⲉⲓⲁ <text:line-break/><text:span text:style-name="T1"> </text:span><text:span text:style-name="T2">(6/24) </text:span> [ⲉⲧⲛ̅ϩⲣ]ⲁⲓ̈ ϩⲛ̅ [ⲛ̅ⲥⲛ]ⲏⲟⲩ ⲁϥⲟⲧ’‐ <text:line-break/><text:span text:style-name="T1"> </text:span><text:span text:style-name="T2">(6/25) </text:span> [ⲡϥ̅ ⲉ]ϩ̣ⲟ̣ⲩ̣ⲛ ⲟⲩⲁⲁϥ̣ [ⲉⲧⲡⲣⲟ]ⲥ̣ⲫⲟ̣‐ <text:line-break/><text:span text:style-name="T1"> </text:span><text:span text:style-name="T2">(6/26) </text:span> [ⲣⲁ] ⲉⲧⲁⲛ̣ϩ̣̅ ⲙⲛ̅ ⲛⲉⲕϫⲡ̣[ⲟ·] ⲁ̣ϥ̣[ⲧⲁ]‐ <text:line-break/><text:span text:style-name="T1"> </text:span><text:span text:style-name="T2">(6/27) </text:span> [ⲗⲟ]ⲟⲩ ⲉϩⲣⲁⲓ̈ ⲙ̅ⲡⲣ̣ⲟ̣[ⲥⲫⲟⲣⲁ ⲙ̅]‐ <text:line-break/><text:span text:style-name="T1"> </text:span><text:span text:style-name="T2">(6/28) </text:span> [ⲡ]ⲧ̣ⲏⲣϥ̅· ϩⲉ]ⲛ̣ⲧⲃ̅ⲛ̣[ⲟⲟⲩⲉ ⲅⲁⲣ ⲁⲛ] <text:line-break/><text:span text:style-name="T1"> </text:span><text:span text:style-name="T2">(6/29) </text:span> [ⲛⲉⲧ]ⲕⲛⲁ̣ⲧ̣ⲁⲗⲟⲟⲩ ⲉϩⲣ̣[ⲁⲓ̈ ϩⲁ ⲛⲟ]‐ <text:line-break/><text:span text:style-name="T1"> </text:span><text:span text:style-name="T2">(7/1) </text:span> ⲃ̣ⲉ̣ ⲙ̅ⲙⲛ̅ⲧ’ⲁⲧⲛⲁϩⲧ̣[ⲉ ⲁⲩⲱ ϩⲁ]‐ <text:line-break/><text:span text:style-name="T1"> </text:span><text:span text:style-name="T2">(7/2) </text:span> [ⲙ̅]ⲙ̣ⲛ̅ⲧ’ⲁⲧ’ⲥⲟⲟⲩⲛ· ⲙ[ⲛ̅ ⲛ̅ϩⲃⲏⲩⲉ ⲧⲏ]‐ <text:line-break/><text:span text:style-name="T1"> </text:span><text:span text:style-name="T2">(7/3) </text:span> [ⲣⲟⲩ] ⲉⲑⲟⲟⲩ ⲉⲧⲟⲩ[ⲛⲁⲁⲁⲩ <text:line-break/><text:span text:style-name="T1"> </text:span><text:span text:style-name="T2">(7/4) </text:span> [..ⲁ]ⲩⲱ ⲛ̅ⲥ[ⲉ]ⲡⲱϩ̣ [ⲁⲛ ⲉϩⲣⲁⲓ̈] <text:line-break/><text:span text:style-name="T1"> </text:span><text:span text:style-name="T2">(7/5) </text:span> [ⲉⲡⲓ]ⲱⲧ’ ⲙ̅ⲡⲧⲏ̣[ⲣ]ϥ̣̅ [ <text:line-break/><text:soft-page-break/><text:span text:style-name="T1"> </text:span><text:span text:style-name="T2">(7/6) </text:span> [...] ⲛ̅ⲧⲡⲓⲥⲧ̣[ⲓⲥ <text:line-break/><text:span text:style-name="T1"> </text:span><text:span text:style-name="T2">(7/7) </text:span> [...].[..]ⲛ̣ⲉ.[ <text:line-break/><text:span text:style-name="T1"> </text:span><text:span text:style-name="T2">(7/8) </text:span> [....]ⲓ̣ⲛ̣[ <text:line-break/><text:span text:style-name="T1"> </text:span><text:span text:style-name="T2">(7/9) </text:span> [.]ϩ· ⲧ̣ⲱⲥ ⲧ[ <text:line-break/><text:span text:style-name="T1"> </text:span><text:span text:style-name="T2">(7/10) </text:span> [.....]ⲉϫ[ <text:line-break/><text:span text:style-name="T1"> </text:span><text:span text:style-name="T2">(7/11) </text:span> (+-14 lines missing) <text:line-break/><text:span text:style-name="T1"> </text:span><text:span text:style-name="T2">(7/25) </text:span> [......]ⲟⲥⲙ[ <text:line-break/><text:span text:style-name="T1"> </text:span><text:span text:style-name="T2">(7/26) </text:span> [.....]ⲙ̣ⲟⲥ .[ <text:line-break/><text:span text:style-name="T1"> </text:span><text:span text:style-name="T2">(7/27) </text:span> [.....] ⲉϫⲓ ⲃ[ⲁⲡⲧⲓⲥⲙⲁ <text:line-break/><text:span text:style-name="T1"> </text:span><text:span text:style-name="T2">(7/28) </text:span> [...ⲙⲟ]ⲩⲉⲓⲟⲟⲩⲉ ⲕ[ <text:line-break/><text:span text:style-name="T1"> </text:span><text:span text:style-name="T2">(8/1) </text:span> [ⲙⲟⲩⲉⲓⲟⲟⲩ]ⲉ ⲅⲁⲣ ⲉⲧ’ϩⲓ̅ⲡⲥⲁⲛ̣[ⲧⲡⲉ] <text:line-break/><text:span text:style-name="T1"> </text:span><text:span text:style-name="T2">(8/2) </text:span> [.......ⲉ]ⲧ’ϫⲓ ⲃⲁⲡⲧⲓⲥⲙⲁ̣ [ <text:line-break/><text:span text:style-name="T1"> </text:span><text:span text:style-name="T2">(8/3) </text:span> [ 8+- ]ⲉ· ⲁⲗⲗⲁ ϫⲓ ⲃⲁ̣[ⲡⲧⲓⲥ]‐ <text:line-break/><text:span text:style-name="T1"> </text:span><text:span text:style-name="T2">(8/4) </text:span> [ⲙⲁ ⲡⲏ ⲉⲧ]ϩ̣ⲛ̅ ⲙ̅[ⲙ]ⲟⲟⲩ ⲉⲧ’̣[ <text:line-break/><text:span text:style-name="T1"> </text:span><text:span text:style-name="T2">(8/5) </text:span> [ 9+- ] ⲉϥⲛⲏⲟⲩ ⲉ̣[ <text:line-break/><text:span text:style-name="T1"> </text:span><text:span text:style-name="T2">(8/6) </text:span> [ 9+- ]ⲟⲥ ⲛ̅ⲛ̅ⲙ̅.[ <text:line-break/><text:span text:style-name="T1"> </text:span><text:span text:style-name="T2">(8/7) </text:span> [ 7+- ⲛⲟ]ϭ ⲛ̅[ <text:line-break/><text:span text:style-name="T1"> </text:span><text:span text:style-name="T2">(8/8) </text:span> [ 11+- ]..[ <text:line-break/><text:span text:style-name="T1"> </text:span><text:span text:style-name="T2">(8/9) </text:span> [.....ⲃⲁⲡⲧⲓⲥ]ⲙⲁ ⲉⲩ.[ <text:line-break/><text:span text:style-name="T1"> </text:span><text:span text:style-name="T2">(8/10) </text:span> [ 10+- ⲉ]ϫ̣ⲛ̅ [ <text:line-break/><text:span text:style-name="T1"> </text:span><text:span text:style-name="T2">(8/11) </text:span> (+-14 lines missing) <text:line-break/><text:span text:style-name="T1"> </text:span><text:span text:style-name="T2">(8/25) </text:span> [ 10+- ]ⲁⲓⲧ.[ <text:line-break/><text:span text:style-name="T1"> </text:span><text:span text:style-name="T2">(8/26) </text:span> [ 10+- ]ϩⲓ̅ⲧⲟ̣[ⲟⲧ† <text:line-break/><text:span text:style-name="T1"> </text:span><text:span text:style-name="T2">(8/27) </text:span> [ 10+- ]ⲛ̅ⲧⲉ ⲡ̣[ <text:line-break/><text:span text:style-name="T1"> </text:span><text:span text:style-name="T2">(8/28) </text:span> [......]ⲉ· ϣⲗⲏⲗ ϩⲁ[ⲡϫⲡⲟ ⲛ̅ⲛ̅]‐ <text:line-break/><text:span text:style-name="T1"> </text:span><text:span text:style-name="T2">(9/1) </text:span> [ⲁⲣ]ⲭⲱⲛ ⲙⲛ̅ ⲛ̅ⲁⲅ’ⲅⲉⲗ̣[ⲟⲥ ⲧⲏⲣⲟ]ⲩ ⲙⲛ̅ <text:line-break/><text:span text:style-name="T1"> </text:span><text:span text:style-name="T2">(9/2) </text:span> [ⲡ]ⲥ̣ⲡⲉⲣⲙⲁ 〈ⲉⲛⲧ〉ⲁϥϩⲉϯⲉ [ⲉⲃⲟⲗ ϩⲙ̅]‐ <text:line-break/><text:span text:style-name="T1"> </text:span><text:span text:style-name="T2">(9/3) </text:span> [ⲡⲓⲱ]ⲧ’ ⲙ̅ⲡⲧⲏⲣϥ̅· ⲧ[ <text:line-break/><text:span text:style-name="T1"> </text:span><text:span text:style-name="T2">(9/4) </text:span> [.]ⲁ ⲧⲏⲣϥ̅ ⲉⲃⲟⲗ [ϩ]ⲛ̣̅ .[ <text:line-break/><text:span text:style-name="T1"> </text:span><text:span text:style-name="T2">(9/5) </text:span> [ⲁⲩ]ϫⲡⲟ ⲛ̅ⲛ̅ⲛ̣[ⲟⲩⲧⲉ ⲙⲛ̅ ⲛ̅ⲁⲅ’]‐ <text:line-break/><text:span text:style-name="T1"> </text:span><text:span text:style-name="T2">(9/6) </text:span> [ⲅⲉ]ⲗⲟⲥ ⲙⲛ̅ ⲛ̅ⲣⲱⲙ[ⲉ <text:line-break/><text:span text:style-name="T1"> </text:span><text:span text:style-name="T2">(9/7) </text:span> [ⲉ]ⲃ̣ⲟⲗ ϩⲙ̅ ⲡⲥⲡ̣[ⲉⲣⲙⲁ ⲙ̅ⲫⲩⲥⲓⲥ] <text:line-break/><text:span text:style-name="T1"> </text:span><text:span text:style-name="T2">(9/8) </text:span> ⲧⲏⲣⲟⲩ ⲛⲉ[ⲧ’]ϩ̣ⲛ̣̅ [ⲙ̅ⲡⲏⲩⲉ ⲙⲛ̅] <text:line-break/><text:span text:style-name="T1"> </text:span><text:span text:style-name="T2">(9/9) </text:span> ⲛⲉⲧ’ϩⲓ̅ϫⲙ̅ ⲡ̣ⲕⲁϩ ⲙⲛ̣̅ [ⲛⲉⲧ’ϩⲁ]‐ <text:line-break/><text:span text:style-name="T1"> </text:span><text:span text:style-name="T2">(9/10) </text:span> ⲡ̣ⲉⲥ̣ⲏⲧ ⲙ̣̅[ⲡⲕ]ⲁϩ̣ [.].ⲁ̣[ <text:line-break/><text:span text:style-name="T1"> </text:span><text:span text:style-name="T2">(9/11) </text:span> (5 lines missing) <text:line-break/><text:span text:style-name="T1"> </text:span><text:span text:style-name="T2">(9/16) </text:span> ⲛⲧ̣[ <text:line-break/><text:span text:style-name="T1"> </text:span><text:span text:style-name="T2">(9/17) </text:span> ⲁⲛ[ <text:line-break/><text:span text:style-name="T1"> </text:span><text:span text:style-name="T2">(9/18) </text:span> ⲛ̣[ <text:line-break/><text:span text:style-name="T1"> </text:span><text:span text:style-name="T2">(9/19) </text:span> (1 line missing) <text:line-break/><text:span text:style-name="T1"> </text:span><text:span text:style-name="T2">(9/20) </text:span> ⲡⲛⲟ̣[ <text:line-break/><text:span text:style-name="T1"> </text:span><text:span text:style-name="T2">(9/21) </text:span> ⲉϩⲣⲁⲓ̈ [ <text:line-break/><text:span text:style-name="T1"> </text:span><text:span text:style-name="T2">(9/22) </text:span> ⲱ̣[...] ⲛ̅[ <text:line-break/><text:span text:style-name="T1"> </text:span><text:span text:style-name="T2">(9/23) </text:span> (1 line missing) <text:line-break/><text:span text:style-name="T1"> </text:span><text:span text:style-name="T2">(9/24) </text:span> [.....].[.].[.] ϯⲙⲁ̣[ <text:line-break/><text:span text:style-name="T1"> </text:span><text:span text:style-name="T2">(9/25) </text:span> [...]ⲫⲩⲥⲓⲥ ⲛ̅ⲛ̅ϩⲓ̅ⲁⲙⲉ [ <text:line-break/><text:span text:style-name="T1"> </text:span><text:span text:style-name="T2">(9/26) </text:span> [.....]ⲉ ϩⲛ̅ ⲛⲉⲧ’ϩⲛ̅ ⲧ[ <text:line-break/><text:soft-page-break/><text:span text:style-name="T1"> </text:span><text:span text:style-name="T2">(9/27) </text:span> [...].ⲁⲩⲙⲁⲣ[ⲟⲩ] ϩⲛ̅ ϩ.[ <text:line-break/><text:span text:style-name="T1"> </text:span><text:span text:style-name="T2">(9/28) </text:span> [ⲡⲁⲓ̈ ⲇⲉ] ⲁ̅ⲇ̅ⲁ̅ⲙ̅ ⲛ̅ⲁⲗⲏⲑⲉ̣ⲓ̣[ⲛⲟⲥ ⲁⲛ] <text:line-break/><text:span text:style-name="T1"> </text:span><text:span text:style-name="T2">(10/1) </text:span> ⲡⲉ ⲟ̣[ⲩⲇⲉ] ⲉⲩϩⲁ ⲛ̅ⲁⲗⲏⲑⲉⲓⲛ[ⲏ ϫ]ⲉ̣ <text:line-break/><text:span text:style-name="T1"> </text:span><text:span text:style-name="T2">(10/2) </text:span> ⲛ̅ⲧ[ⲁⲣⲟⲩⲟⲩⲱ]ⲙ ⲉⲃⲟⲗ ϩⲙ̅ ⲡϣⲏ̣[ⲛ ⲛ̅]‐ <text:line-break/><text:span text:style-name="T1"> </text:span><text:span text:style-name="T2">(10/3) </text:span> [ⲧⲅⲛⲱⲥⲓⲥ ⲁ]ⲩⲣ̅ⲕⲁⲧⲁⲡⲁⲧⲉⲓ [ⲛ̅ⲛ̅]‐ <text:line-break/><text:span text:style-name="T1"> </text:span><text:span text:style-name="T2">(10/4) </text:span> [ⲭⲉⲣⲟⲩⲃⲉⲓ]ⲛ ⲙⲛ̅ ⲛ̅ⲥⲁⲣⲁⲫⲉⲓ̣[ⲛ] <text:line-break/><text:span text:style-name="T1"> </text:span><text:span text:style-name="T2">(10/5) </text:span> [ⲙⲛ̅ ⲧⲥⲏϥⲉ ⲛ̅ⲕ]ⲱ̣ϩⲧ’ ⲁⲩⲣ̅ⲕⲁ[ <text:line-break/><text:span text:style-name="T1"> </text:span><text:span text:style-name="T2">(10/6) </text:span> [ 9+- ]ⲉⲧ’̣ⲛ̅ ⲁⲇⲁⲙ [ <text:line-break/><text:span text:style-name="T1"> </text:span><text:span text:style-name="T2">(10/7) </text:span> [......ⲛ̅ⲕⲟⲥ]ⲙ̣ⲟⲕⲣⲁⲧⲱⲣ ⲙ̣[ⲛ̅] <text:line-break/><text:span text:style-name="T1"> </text:span><text:span text:style-name="T2">(10/8) </text:span> [ 12+- ]ⲙⲟⲩ ⲉⲃⲟⲗ̣ <text:line-break/><text:span text:style-name="T1"> </text:span><text:span text:style-name="T2">(10/9) </text:span> [ 7+- ⲙ]ⲛ̣̅ⲛ̣̅ⲥⲁ ⲧⲣⲉⲩϫⲡⲟ <text:line-break/><text:span text:style-name="T1"> </text:span><text:span text:style-name="T2">(10/10) </text:span> [ 7+- ]ϫ̣ⲡⲟ ⲛ̅[ⲧ]ⲉ ⲛ̅ⲁⲣⲭⲱⲛ ⲙⲛ̅ <text:line-break/><text:span text:style-name="T1"> </text:span><text:span text:style-name="T2">(10/11) </text:span> [ⲛⲟⲩⲕⲟⲥ]ⲙ̣ⲓⲕ[ⲟ]ⲛ [ⲛⲁ]ⲓ̈ ⲉⲩⲏⲡ ⲉ̣ <text:line-break/><text:span text:style-name="T1"> </text:span><text:span text:style-name="T2">(10/12) </text:span> (5 lines missing) <text:line-break/><text:span text:style-name="T1"> </text:span><text:span text:style-name="T2">(10/17) </text:span> [ 18+- ] ⲁ̣ⲗ̣‐ <text:line-break/><text:span text:style-name="T1"> </text:span><text:span text:style-name="T2">(10/18) </text:span> [ⲗⲁ 15+- ] ⲉⲩⲟ <text:line-break/><text:span text:style-name="T1"> </text:span><text:span text:style-name="T2">(10/19) </text:span> [ 19+- ]ⲁ <text:line-break/><text:span text:style-name="T1"> </text:span><text:span text:style-name="T2">(10/20) </text:span> (1 line missing) <text:line-break/><text:span text:style-name="T1"> </text:span><text:span text:style-name="T2">(10/21) </text:span> [ 18+- ]ⲛ̣ <text:line-break/><text:span text:style-name="T1"> </text:span><text:span text:style-name="T2">(10/22) </text:span> (3 lines missing) <text:line-break/><text:span text:style-name="T1"> </text:span><text:span text:style-name="T2">(10/25) </text:span> [....ⲟⲩⲟ]ⲉⲓⲛ [ <text:line-break/><text:span text:style-name="T1"> </text:span><text:span text:style-name="T2">(10/26) </text:span> [..ⲁ]ⲩ̣ⲱ ⲛ̅ϩⲓ̅ⲟⲙⲉ ⲙⲛ̅ ⲛ̅ϩⲟ̣[ⲟⲩⲧ’] <text:line-break/><text:span text:style-name="T1"> </text:span><text:span text:style-name="T2">(10/27) </text:span> [ⲛⲉ]ⲧ’ϣⲟⲟⲡ ⲛⲙ̅.[ <text:line-break/><text:span text:style-name="T1"> </text:span><text:span text:style-name="T2">(10/28) </text:span> [..ϩ]ⲱⲡ ⲉⲫⲩⲥⲓⲥ ⲛⲓⲙ [ⲁⲩⲱ ⲥⲉⲛⲁ] <text:line-break/><text:span text:style-name="T1"> </text:span><text:span text:style-name="T2">(10/29) </text:span> [ⲣ̅ⲁⲡ]ⲟ̣ⲧ̣ⲁ̣[ⲥ]ⲥⲉ ⲛ̅ⲛ̅ⲁⲣⲭⲱ[ⲛ ⲛ̅ϭⲓ ⲛⲏ] <text:line-break/><text:span text:style-name="T1"> </text:span><text:span text:style-name="T2">(11/1) </text:span> [ⲉ]ⲧ’̣ϫⲓ ⲛ̅ⲧⲟⲟⲧϥ̅ ⲛ̅ⲛⲉ̣[ <text:line-break/><text:span text:style-name="T1"> </text:span><text:span text:style-name="T2">(11/2) </text:span> [ⲥⲉ]ⲣ̣̅ ⲙ̅ⲡϣⲁ ⲅⲁⲣ ⲛ̅[ <text:line-break/><text:span text:style-name="T1"> </text:span><text:span text:style-name="T2">(11/3) </text:span> [ⲁⲧ]ⲙ̣ⲟⲩ ⲙⲛ̅ ϩⲉⲛⲛ̣[ⲟϭ ⲛ̅ <text:line-break/><text:span text:style-name="T1"> </text:span><text:span text:style-name="T2">(11/4) </text:span> [...] ⲙⲛ̅ ϩⲉⲛⲛ̣[ⲟϭ <text:line-break/><text:span text:style-name="T1"> </text:span><text:span text:style-name="T2">(11/5) </text:span> [ⲙⲛ̅ ϩⲉ]ⲛⲛⲟϭ ⲛ̣̅[ <text:line-break/><text:span text:style-name="T1"> </text:span><text:span text:style-name="T2">(11/6) </text:span> [....] ⲛ̣̅ϣⲏⲣⲉ ⲛ̅[ⲛ̅]ⲣ[ⲱⲙⲉ <text:line-break/><text:span text:style-name="T1"> </text:span><text:span text:style-name="T2">(11/7) </text:span> [..ⲙ]ⲁ̣[ⲑⲏ]ⲧ̣ⲏⲥ [ <text:line-break/><text:span text:style-name="T1"> </text:span><text:span text:style-name="T2">(11/8) </text:span> [....ϩⲓ̅]ⲕⲱ[ⲛ] ⲁⲩⲱ[ <text:line-break/><text:span text:style-name="T1"> </text:span><text:span text:style-name="T2">(11/9) </text:span> [ 9+- ⲉ]ⲃⲟⲗ ϩⲙ̣̅ ⲡ̣ⲟⲩ‐ <text:line-break/><text:span text:style-name="T1"> </text:span><text:span text:style-name="T2">(11/10) </text:span> [ⲟⲉⲓⲛ 7+- ]ⲥ̣ ⲉⲧⲟⲩ[ⲁ]ⲁⲃ <text:line-break/><text:span text:style-name="T1"> </text:span><text:span text:style-name="T2">(11/11) </text:span> [ 13+- ⲅ]ⲁⲣ ϫ̣[ⲓ]ⲛ̣ ⲛ̅‐ <text:line-break/><text:span text:style-name="T1"> </text:span><text:span text:style-name="T2">(11/12) </text:span> [ϣⲟⲣⲡ̅ 10+- ]ⲟⲩⲥ̣ⲡ̣ⲉⲣ[ⲙⲁ] <text:line-break/><text:span text:style-name="T1"> </text:span><text:span text:style-name="T2">(11/13) </text:span> (+-16 lines missing) <text:line-break/><text:span text:style-name="T1"> </text:span><text:span text:style-name="T2">(12/1) </text:span> [ 7+- ] ϯⲛⲁⲕⲁⲣⲱⲉⲓ ⲇⲉ <text:line-break/><text:span text:style-name="T1"> </text:span><text:span text:style-name="T2">(12/2) </text:span> [ 8+- ]ⲉ· ⲁⲛⲟⲛ ⲅⲁⲣ ⲛ[ⲉ] <text:line-break/><text:span text:style-name="T1"> </text:span><text:span text:style-name="T2">(12/3) </text:span> [ⲛ̅ⲥⲛⲏⲩ ⲉⲛⲧⲁ]ϩ{ⲉ̅ⲓ} ⲉⲡⲓⲧⲛ̅ ⲉⲃ[ⲟⲗ] <text:line-break/><text:span text:style-name="T1"> </text:span><text:span text:style-name="T2">(12/4) </text:span> [ 8+- ]ⲟⲛϩ̅· ⲥⲉⲛⲁϭⲱ <text:line-break/><text:span text:style-name="T1"> </text:span><text:span text:style-name="T2">(12/5) </text:span> [ 9+- ⲉ]ϫ̣ⲛ̅ ⲛⲁⲡⲟ[ <text:line-break/><text:span text:style-name="T1"> </text:span><text:span text:style-name="T2">(12/6) </text:span> [ 10+- ].ⲟⲩ ⲛ̅ⲛ̅ⲁ̣[ <text:line-break/><text:span text:style-name="T1"> </text:span><text:span text:style-name="T2">(12/7) </text:span> [ 7+- ]ⲡ ⲛ̣̅ⲧⲉ ⲁ̅ⲇ̅ⲁ̅ⲙ̅ <text:line-break/><text:span text:style-name="T1"> </text:span><text:span text:style-name="T2">(12/8) </text:span> [......ⲁ̅ⲃ̅ⲉ̅]̅ⲗ̅ ⲉ̅ⲛⲱⲭ̣̅ ⲛ̣̅[ⲱⲉ̅ <text:line-break/><text:span text:style-name="T1"> </text:span><text:span text:style-name="T2">(12/9) </text:span> [ 9+- ]̅ⲭ̅ⲉ̅ⲓ̣̅̅[̅ <text:line-break/><text:soft-page-break/><text:span text:style-name="T1"> </text:span><text:span text:style-name="T2">(12/10) </text:span> [..]ⲕ’ ⲙⲉⲗϫⲓ̣ⲥⲉ̣ⲇ̣[ⲉⲕ’ ⲡⲟⲩⲏⲏⲃ] <text:line-break/><text:span text:style-name="T1"> </text:span><text:span text:style-name="T2">(12/11) </text:span> ⲙ̅ⲡⲛⲟⲩⲧⲉ̣ [ⲉⲧ’ϫⲟⲥⲉ <text:line-break/><text:span text:style-name="T1"> </text:span><text:span text:style-name="T2">(12/12) </text:span> ⲛⲉⲛⲧⲁⲩⲙ̅[ <text:line-break/><text:span text:style-name="T1"> </text:span><text:span text:style-name="T2">(12/13) </text:span> ⲛ̅ϩⲓⲁⲙⲉ ⲛ̅[ <text:line-break/><text:span text:style-name="T1"> </text:span><text:span text:style-name="T2">(12/14) </text:span> ⲙⲛ̅ⲧ’ⲁⲧ.[ <text:line-break/><text:span text:style-name="T1"> </text:span><text:span text:style-name="T2">(12/15) </text:span> ⲙ̣[.] ⲙ̣̅[ <text:line-break/><text:span text:style-name="T1"> </text:span><text:span text:style-name="T2">(12/16) </text:span> (+-15 lines missing) <text:line-break/><text:span text:style-name="T1"> </text:span><text:span text:style-name="T2">(13/1) </text:span> ⲡ̣ⲉⲓ̈ⲥⲛⲁⲩ ⲉⲛⲧⲁⲩⲥⲟⲧⲡⲟ[ⲩ] <text:line-break/><text:span text:style-name="T1"> </text:span><text:span text:style-name="T2">(13/2) </text:span> [ϩⲛ̅] ⲕⲁⲓⲣⲟⲥ ⲛⲓⲙ ⲁⲛ· ⲟⲩⲇⲉ̣ <text:line-break/><text:span text:style-name="T1"> </text:span><text:span text:style-name="T2">(13/3) </text:span> [ϩⲛ̅ ⲧⲟ]ⲡⲟⲥ ⲛⲓⲙ ⲁⲛ ⲉⲩⲛⲁϫⲡ̣[ⲓ]‐ <text:line-break/><text:span text:style-name="T1"> </text:span><text:span text:style-name="T2">(13/4) </text:span> [ⲟⲟⲩ] ϩⲟⲧⲁⲛ ⲉⲩϣⲁⲛϫ̣ⲡⲟ[ⲟⲩ] <text:line-break/><text:span text:style-name="T1"> </text:span><text:span text:style-name="T2">(13/5) </text:span> [ϩⲓ̅ⲧⲛ̅] ⲛ̅ϫⲁϫⲉ ϩⲓ̅ⲧⲛ̅ ⲛ̣̅ϣⲃⲉⲉⲣ <text:line-break/><text:span text:style-name="T1"> </text:span><text:span text:style-name="T2">(13/6) </text:span> [ⲟⲩⲇⲉ ϩⲓ̅]ⲧⲛ̅ ⲛ̅ϣⲙ̅ⲙⲟ ⲙⲛ̅ ⲛⲉⲧ̣[ⲉ]‐ <text:line-break/><text:span text:style-name="T1"> </text:span><text:span text:style-name="T2">(13/7) </text:span> [ⲛⲟⲩ]ⲟⲩ ⲛⲉ ⲛ̅ⲧⲟⲟⲧⲟⲩ ⲛ̅ⲛ̅ⲁⲥⲉ̣‐ <text:line-break/><text:span text:style-name="T1"> </text:span><text:span text:style-name="T2">(13/8) </text:span> [ⲃⲏⲥ] ⲙⲛ̅ ⲛⲉⲩⲥⲉⲃⲏⲥ· ⲥⲉⲛ̣[ⲁ] <text:line-break/><text:span text:style-name="T1"> </text:span><text:span text:style-name="T2">(13/9) </text:span> [ 7+- ]ⲩ ⲛ̅ϭⲓ ⲙ̅ⲫⲩⲥⲓⲥ ⲧ[ⲏ]‐ <text:line-break/><text:span text:style-name="T1"> </text:span><text:span text:style-name="T2">(13/10) </text:span> [ⲣⲟⲩ ⲛ̅ⲁⲛ]ⲧ̣[ⲓ]ⲕⲉⲓⲙⲉⲛⲏ· ⲉⲓⲧⲉ <text:line-break/><text:span text:style-name="T1"> </text:span><text:span text:style-name="T2">(13/11) </text:span> [ⲛⲉⲧⲟⲩ]ⲟⲛϩ̣̅ [ⲉ]ⲃⲟⲗ ⲙⲛ̅ ⲛⲉⲧⲉ‐ <text:line-break/><text:span text:style-name="T1"> </text:span><text:span text:style-name="T2">(13/12) </text:span> [ⲛ̅ⲥⲉⲟⲩⲟⲛϩ̅ ⲉ]ⲃ̣[ⲟ]ⲗ ⲁⲛ· ⲙⲛ̅ ⲛⲉ[ⲧ’]‐ <text:line-break/><text:span text:style-name="T1"> </text:span><text:span text:style-name="T2">(13/13) </text:span> [ϣⲟⲟ]ⲡ’ [ϩ]ⲛ̣̅ ⲛⲙ̅ⲡⲏⲩⲉ ⲙⲛ̅ ⲛ[ⲉ]ⲧ’̣‐ <text:line-break/><text:span text:style-name="T1"> </text:span><text:span text:style-name="T2">(13/14) </text:span> [ϩⲓ̅ϫⲙ̅] ⲡ̣ⲕⲁϩ [ⲙ]ⲛ̅ ⲛⲉⲧ’ϩⲁⲡ̣[ⲉ]‐ <text:line-break/><text:span text:style-name="T1"> </text:span><text:span text:style-name="T2">(13/15) </text:span> [ⲥⲏⲧ’] ⲙ̅ⲡⲕⲁ[ϩ] ⲥ̣ⲉⲛⲁⲣ̅ ⲡⲟⲗ[ⲉⲙ]‐ <text:line-break/><text:span text:style-name="T1"> </text:span><text:span text:style-name="T2">(13/16) </text:span> [ⲟⲥ..]ⲡ[..]..ⲟⲩⲟⲛ ⲛⲓⲙ· [ <text:line-break/><text:span text:style-name="T1"> </text:span><text:span text:style-name="T2">(13/17) </text:span> [...]ⲡ’ ⲅⲁⲣ ⲉⲓⲧⲉ ϩⲙ̅ ⲡ̣[ <text:line-break/><text:span text:style-name="T1"> </text:span><text:span text:style-name="T2">(13/18) </text:span> [ 8+- ]ⲁ̣ⲃ ⲙⲛ̅ ⲙ.[ <text:line-break/><text:span text:style-name="T1"> </text:span><text:span text:style-name="T2">(13/19) </text:span> [ 9+- ]ⲙⲉ [ⲛ̅]ⲧⲉ[ <text:line-break/><text:span text:style-name="T1"> </text:span><text:span text:style-name="T2">(13/20) </text:span> [ 8+- ]ⲁⲛⲁ[ <text:line-break/><text:span text:style-name="T1"> </text:span><text:span text:style-name="T2">(13/21) </text:span> [......ⲛⲁ]ϣ̣ⲱⲟⲩ [ <text:line-break/><text:span text:style-name="T1"> </text:span><text:span text:style-name="T2">(13/22) </text:span> [ 8+- ϩ]ⲛ̅ ⲟⲩ[ <text:line-break/><text:span text:style-name="T1"> </text:span><text:span text:style-name="T2">(13/23) </text:span> [ 8+- ⲉ]ⲣⲟⲟⲩ̣ [ <text:line-break/><text:span text:style-name="T1"> </text:span><text:span text:style-name="T2">(13/24) </text:span> [ 8+- ] ⲙ̅ⲙⲟⲥ̣ [.].[.].[ <text:line-break/><text:span text:style-name="T1"> </text:span><text:span text:style-name="T2">(13/25) </text:span> [ 8+- ]ⲁ ⲛⲁⲓ̈ ⲇⲉ ϩⲙ̅ ⲡ[ <text:line-break/><text:span text:style-name="T1"> </text:span><text:span text:style-name="T2">(13/26) </text:span> [..ⲟⲩⲟⲛ] ⲛ̣ⲓ̣ⲙ ⲥⲉⲛⲁⲡ[ <text:line-break/><text:span text:style-name="T1"> </text:span><text:span text:style-name="T2">(13/27) </text:span> [....]ⲟⲩ· ⲛⲁⲓ̈ ⲥⲉⲛ[ⲁ <text:line-break/><text:span text:style-name="T1"> </text:span><text:span text:style-name="T2">(13/28) </text:span> [...ϩ]ⲛ̅ ⲥⲏϣⲉ ⲛⲓⲙ̣̓ [ <text:line-break/><text:span text:style-name="T1"> </text:span><text:span text:style-name="T2">(14/1) </text:span> ϩⲉⲛϣⲱⲛⲉ· ⲛⲁⲓ̈ ⲙⲉⲛ ϩⲛ̅ ϩ̣[ⲉⲛ]‐ <text:line-break/><text:span text:style-name="T1"> </text:span><text:span text:style-name="T2">(14/2) </text:span> ⲕ̣[ⲉ]ⲥⲙⲟⲧ’ ⲥⲉⲛⲁⲟⲧⲡⲟⲩ [ⲁⲩⲱ] <text:line-break/><text:span text:style-name="T1"> </text:span><text:span text:style-name="T2">(14/3) </text:span> [ⲛ̅ⲥ]ⲉⲣ̅ⲕⲟⲗⲁⲍⲉ ⲙ̅ⲙⲟⲟⲩ [ⲛⲁⲓ̈] <text:line-break/><text:span text:style-name="T1"> </text:span><text:span text:style-name="T2">(14/4) </text:span> [ⲙⲉ]ⲛ ⲡⲥ̣ⲱⲧⲏⲣ ⲛⲁϥⲓⲧⲟⲩ [ⲉⲃⲟⲗ] <text:line-break/><text:span text:style-name="T1"> </text:span><text:span text:style-name="T2">(14/5) </text:span> [ⲛ̅]ⲥⲉⲣ̣̅ ⲧⲡⲉ ⲛ̅ⲟⲩⲟⲛ ⲛⲓⲙ ϩ̣[ⲓ̅ⲧⲛ̅] <text:line-break/><text:span text:style-name="T1"> </text:span><text:span text:style-name="T2">(14/6) </text:span> ⲛ̣̅ⲧⲁⲡⲣⲟ ⲙⲛ̅ ⲛ̅ϣⲁϫⲉ [ⲙⲉⲛ ⲁⲛ] <text:line-break/><text:span text:style-name="T1"> </text:span><text:span text:style-name="T2">(14/7) </text:span> [ⲉ]ⲃ̣ⲟⲗ ⲇⲉ ϩⲓ̅ⲧⲟⲟⲧⲟⲩ ⲛ̅ⲛⲙ̣̅[ <text:line-break/><text:span text:style-name="T1"> </text:span><text:span text:style-name="T2">(14/8) </text:span> [.].ⲥ ⲉⲧⲟⲩⲛⲁⲁⲁⲩ ⲛ̣ⲁ[ⲩ· ϥⲛⲁⲣ̅]‐ <text:line-break/><text:span text:style-name="T1"> </text:span><text:span text:style-name="T2">(14/9) </text:span> ⲕ̣ⲁⲧⲁⲗⲩⲉ ⲙ̅ⲡⲙⲟⲩ[· ⲛⲁⲓ̈ ⲙⲉⲛ] <text:line-break/><text:span text:style-name="T1"> </text:span><text:span text:style-name="T2">(14/10) </text:span> ⲉⲛ̣ⲧⲁⲩⲟⲩⲉϩ ⲥⲁϩ[ⲛⲉ ⲉⲣⲟ]‐ <text:line-break/><text:span text:style-name="T1"> </text:span><text:span text:style-name="T2">(14/11) </text:span> ⲟⲩ ⲛⲁⲓ̈ ⲉϭⲟⲗ[ⲡ]ⲟⲩ ⲉ̣[ⲃⲟⲗ] <text:line-break/><text:span text:style-name="T1"> </text:span><text:span text:style-name="T2">(14/12) </text:span> ϭⲟⲗⲡⲟⲩ ⲉ̣[ⲃⲟⲗ ⲛ̅ⲧⲁϩⲉ· ⲡⲁⲓ̈] <text:line-break/><text:soft-page-break/><text:span text:style-name="T1"> </text:span><text:span text:style-name="T2">(14/13) </text:span> ⲇⲉ ⲉⲧ’ϩⲏⲡ’ ⲙ̅ⲡⲣ̅ϭⲁⲗ̣ⲉ[ⲡϥ̅ ⲉⲃⲟⲗ] <text:line-break/><text:span text:style-name="T1"> </text:span><text:span text:style-name="T2">(14/14) </text:span> [ⲛ̅]ⲗ̣ⲁ̣ⲁⲩ· ⲉⲓⲙⲏ[ⲧⲓ] ⲛ̅ⲥⲉϭ̣[ⲱⲗⲉⲡ’] <text:line-break/><text:span text:style-name="T1"> </text:span><text:span text:style-name="T2">(14/15) </text:span> [ⲉⲃ]ⲟⲗ ⲛⲁⲕ· ⲁⲩⲱ ⲛ̅ⲧⲉ[ⲩⲛⲟⲩ] <text:line-break/><text:span text:style-name="T1"> </text:span><text:span text:style-name="T2">(14/16) </text:span> [ⲁⲉⲓ]ⲧⲱⲱⲛ ⲁⲛ[ⲟⲕ] ⲙ̣ⲉ̣ⲗ[ϫⲓⲥⲉ]‐ <text:line-break/><text:span text:style-name="T1"> </text:span><text:span text:style-name="T2">(14/17) </text:span> [ⲇⲉⲕ ⲁ]ⲩ̣ⲱ ⲁⲓ̈ⲁⲣϫⲉⲓ ⲛ̅[ <text:line-break/><text:span text:style-name="T1"> </text:span><text:span text:style-name="T2">(14/18) </text:span> [...ⲡ]ⲛ̣ⲟ̣ⲩⲧⲉ ⲉ[ <text:line-break/><text:span text:style-name="T1"> </text:span><text:span text:style-name="T2">(14/19) </text:span> [....]ⲉ̣ⲧⲣⲁ[ⲟ]ⲩⲛ̣[ⲟϥ <text:line-break/><text:span text:style-name="T1"> </text:span><text:span text:style-name="T2">(14/20) </text:span> [ 8+- ]ⲛⲁ̣ⲣ[ <text:line-break/><text:span text:style-name="T1"> </text:span><text:span text:style-name="T2">(14/21) </text:span> [ 7+- ]ⲉϥⲣ̅ ϩⲱ̣[ⲃ <text:line-break/><text:span text:style-name="T1"> </text:span><text:span text:style-name="T2">(14/22) </text:span> [....ⲉ]ⲧ̣ⲟⲛϩ̅ [ <text:line-break/><text:span text:style-name="T1"> </text:span><text:span text:style-name="T2">(14/23) </text:span> [ⲁⲉⲓϫⲟⲟ]ⲥ ϫⲉ ϯ[ <text:line-break/><text:span text:style-name="T1"> </text:span><text:span text:style-name="T2">(14/24) </text:span> [......ⲁ]ⲩⲱ ϯ[ <text:line-break/><text:span text:style-name="T1"> </text:span><text:span text:style-name="T2">(14/25) </text:span> [..].ⲉϩⲣⲁⲓ̈ ⲙ̅ⲡⲣ[ <text:line-break/><text:span text:style-name="T1"> </text:span><text:span text:style-name="T2">(14/26) </text:span> [ⲁⲩⲱ ϯ]ⲛ̣ⲁⲗⲟ ⲁⲛ ϫ̣ⲓ̣ⲛ̣ [ⲧⲉⲛⲟⲩ] <text:line-break/><text:span text:style-name="T1"> </text:span><text:span text:style-name="T2">(14/27) </text:span> [ⲛ̅ϣⲁ ⲉⲛⲉ]ϩ ⲱ͂ ⲡⲓⲱⲧ’ ⲙ̅ⲡ[ⲧⲏⲣϥ̅] <text:line-break/><text:span text:style-name="T1"> </text:span><text:span text:style-name="T2">(14/28) </text:span> [ⲉⲃⲟⲗ] ϫ̣ⲉ ⲁⲕ’ⲛⲁ ⲛ[ⲁ]ⲓ̣̈· ⲁⲩ[ⲱ] <text:line-break/><text:span text:style-name="T1"> </text:span><text:span text:style-name="T2">(15/1) </text:span> [ⲁⲕⲧⲛ̅ⲛⲉⲩ ⲡⲁⲅ’ⲅ]ⲉⲗⲟⲥ ⲛ̅ⲟⲩ[ⲟ]ⲉⲓⲛ <text:line-break/><text:span text:style-name="T1"> </text:span><text:span text:style-name="T2">(15/2) </text:span> [ 8+- ⲉ]ⲃ̣[ⲟ]ⲗ ϩⲛ̅ ⲛⲉⲕⲁ̣ⲓ̣[ⲱⲛ] <text:line-break/><text:span text:style-name="T1"> </text:span><text:span text:style-name="T2">(15/3) </text:span> [.....ⲉ]ϭ̣ⲱⲗⲡ̅ ⲉⲃ[ⲟⲗ <text:line-break/><text:span text:style-name="T1"> </text:span><text:span text:style-name="T2">(15/4) </text:span> [ 8+- ]ⲡⲁⲓ̈ ⲛ̅[ⲧ]ⲁ̣ⲣⲉϥ{ⲉ̅ⲓ̣̅} [ⲁ]ϥ <text:line-break/><text:span text:style-name="T1"> </text:span><text:span text:style-name="T2">(15/5) </text:span> [ⲧⲣⲉⲩϫⲁ]ⲥⲧ̅’ ⲉⲃⲟⲗ ϩⲛ̅ ⲧⲙⲛ̅ⲧ’ⲁⲧ’ <text:line-break/><text:span text:style-name="T1"> </text:span><text:span text:style-name="T2">(15/6) </text:span> [ⲥⲟ]ⲟⲩⲛ ⲁⲩⲱ ⲧⲙⲛ̅ⲧⲣⲉϥϯ ⲕⲁⲣ‐ <text:line-break/><text:span text:style-name="T1"> </text:span><text:span text:style-name="T2">(15/7) </text:span> [ⲡⲟ]ⲥ ⲙ̅ⲡⲙ̣[ⲟ]ⲩ· ⲉⲡⲱⲛϩ̅· ⲟⲩ‐ <text:line-break/><text:span text:style-name="T1"> </text:span><text:span text:style-name="T2">(15/8) </text:span> ⲛ̅ⲧⲏⲉⲓ ⲅ̣ⲁ̣ⲣ̣ ⲙ̅ⲙⲁⲩ ⲛ̅ⲟⲩⲣⲁⲛ <text:line-break/><text:span text:style-name="T1"> </text:span><text:span text:style-name="T2">(15/9) </text:span> ⲁⲛ̣ⲟ̣ⲕ’̣ [ⲙⲉⲗϫ]ⲉⲓⲥⲉⲇⲉⲕ’ ⲡⲟⲩ‐ <text:line-break/><text:span text:style-name="T1"> </text:span><text:span text:style-name="T2">(15/10) </text:span> ⲏ̣ⲏ̣ⲃ ⲙ̣̅ⲡ̣[ⲛⲟⲩⲧⲉ] ⲉⲧ’ϫⲟⲥⲉ· ϯ‐ <text:line-break/><text:span text:style-name="T1"> </text:span><text:span text:style-name="T2">(15/11) </text:span> [ⲉⲓⲙ]ⲉ ϫ̣ⲉ̣ ⲁ̣[ⲗ]ⲏ̣ⲑ̣ⲱ̣ⲥ ⲁⲛⲟⲕ ⲡⲉ <text:line-break/><text:span text:style-name="T1"> </text:span><text:span text:style-name="T2">(15/12) </text:span> [ⲡⲓⲛⲉ ⲙ̅]ⲡⲁⲣⲭⲓⲉⲣⲉⲩⲥ ⲙ̅ⲙⲉ <text:line-break/><text:span text:style-name="T1"> </text:span><text:span text:style-name="T2">(15/13) </text:span> [ⲙ̅ⲡⲛ]ⲟ̣ⲩⲧⲉ ⲉⲧ’ϫⲟⲥⲉ· ⲁⲩⲱ <text:line-break/><text:span text:style-name="T1"> </text:span><text:span text:style-name="T2">(15/14) </text:span> [...]ⲧ’̣ⲁ[...]ⲡ̣ⲕⲟⲥⲙⲟⲥ· [ⲟⲩ]‐ <text:line-break/><text:span text:style-name="T1"> </text:span><text:span text:style-name="T2">(15/15) </text:span> [ⲡⲣⲁⲅⲙ]ⲁ̣ ⲅ̣ⲁⲣ ϣⲏⲙ ⲁⲛ ⲡⲉ̣ [ϫⲉ] <text:line-break/><text:span text:style-name="T1"> </text:span><text:span text:style-name="T2">(15/16) </text:span> [....] ⲛ̅ϭⲓ ⲡⲛⲟⲩⲧⲉ ⲙ̣ⲛ̅[ <text:line-break/><text:span text:style-name="T1"> </text:span><text:span text:style-name="T2">(15/17) </text:span> ⲁ.[.....]ⲡ̣ⲁ[..] ⲉϥⲣ̅ .[ <text:line-break/><text:span text:style-name="T1"> </text:span><text:span text:style-name="T2">(15/18) </text:span> ⲁⲩⲱ̣ [....ⲛⲁⲅ’ⲅ]ⲉ̣ⲗⲟⲥ ⲉ[ⲧϣⲟ]‐ <text:line-break/><text:span text:style-name="T1"> </text:span><text:span text:style-name="T2">(15/19) </text:span> ⲟⲡ’ ϩ̣[ⲓ̅ϫⲙ̅ ⲡ]ⲕⲁϩ ϩ[ <text:line-break/><text:span text:style-name="T1"> </text:span><text:span text:style-name="T2">(15/20) </text:span> ⲛ̣[.....]ϥ̣ⲉ ⲟⲩ[ <text:line-break/><text:span text:style-name="T1"> </text:span><text:span text:style-name="T2">(15/21) </text:span> ⲛ̣[.....] ⲁⲩϣ.[ <text:line-break/><text:span text:style-name="T1"> </text:span><text:span text:style-name="T2">(15/22) </text:span> ⲡ̣ⲉ ⲡϣ[ⲱ]ⲧ̣ ⲛ̅ⲧ[ <text:line-break/><text:span text:style-name="T1"> </text:span><text:span text:style-name="T2">(15/23) </text:span> ⲉⲛⲧⲁⲡ[ⲙ]ⲟⲩ ⲣ̅ⲡⲗⲁⲛⲁ ⲙ̣̅ⲙⲟϥ <text:line-break/><text:span text:style-name="T1"> </text:span><text:span text:style-name="T2">(15/24) </text:span> ⲛ̅ⲧⲁⲣⲉ̣[ϥⲙⲟ]ⲩ ⲁϥⲙⲟⲣ̣[ⲟ]ⲩ <text:line-break/><text:span text:style-name="T1"> </text:span><text:span text:style-name="T2">(15/25) </text:span> [ⲛ̅]ⲛⲙ̅ⲫⲩⲥⲓⲥ ⲉⲧⲣ̅ⲡⲗ̣[ⲁⲛ]ⲁ̣ [ⲙ̅] <text:line-break/><text:span text:style-name="T1"> </text:span><text:span text:style-name="T2">(15/26) </text:span> [ⲙⲟⲟⲩ] ⲉⲧⲓ̣ ⲁ̣ϥⲧⲉⲗⲟ ⲉϩⲣⲁ[ⲓ̈ ⲛ̅]‐ <text:line-break/><text:span text:style-name="T1"> </text:span><text:span text:style-name="T2">(16/1) </text:span> ϩⲉⲛ̣ⲡⲣⲟⲥⲫⲟⲣ̣[ⲁ <text:line-break/><text:span text:style-name="T1"> </text:span><text:span text:style-name="T2">(16/2) </text:span> ⲧⲉ̣ ⲛ̅ⲧⲃ̅ⲛⲟⲟⲩ[ⲉ <text:line-break/><text:span text:style-name="T1"> </text:span><text:span text:style-name="T2">(16/3) </text:span> [ⲁ]ⲉⲓⲧⲁⲁⲩ ⲙ̅ⲡⲙⲟ̣[ⲩ <text:line-break/><text:span text:style-name="T1"> </text:span><text:span text:style-name="T2">(16/4) </text:span> [ⲙ]ⲛ̣̅ [ⲛ̅ⲁⲅⲅⲉ]ⲗ̣ⲟⲥ ⲙⲛ̅ ⲛ[ <text:line-break/><text:span text:style-name="T1"> </text:span><text:span text:style-name="T2">(16/5) </text:span> [....].[.ⲛ̅ⲇ]ⲁⲓⲙⲱ[ⲛ......ϩⲉⲛ]‐ <text:line-break/><text:soft-page-break/><text:span text:style-name="T1"> </text:span><text:span text:style-name="T2">(16/6) </text:span> ⲡⲣⲟⲥⲫⲟⲣ̣ⲁ ⲉⲩⲟⲛ̣ϩ̅ ⲛ[ <text:line-break/><text:span text:style-name="T1"> </text:span><text:span text:style-name="T2">(16/7) </text:span> ⲁⲉⲓⲧⲉⲗⲟⲉⲓ ⲉϩⲣⲁⲓ̈ ⲛⲁⲕ’̣ ⲙ̣̅ⲡ̅[ⲣⲟⲥ]‐ <text:line-break/><text:span text:style-name="T1"> </text:span><text:span text:style-name="T2">(16/8) </text:span> ⲫⲟⲣⲁ ⲙⲛ̅ ⲛⲉⲧⲉ ⲛ[ⲟ]ⲩⲉⲓ ⲛⲉ [ⲛ̅]‐ <text:line-break/><text:span text:style-name="T1"> </text:span><text:span text:style-name="T2">(16/9) </text:span> ⲧⲟⲕ’ ⲟⲩⲁⲁⲕ ⲡⲓⲱⲧ’ ⲙ̅ⲡⲧⲏⲣϥ̅ ⲙⲛ̅ <text:line-break/><text:span text:style-name="T1"> </text:span><text:span text:style-name="T2">(16/10) </text:span> ⲛⲉⲧⲕ̅’ⲟⲩⲁϣⲟⲩ ⲉ̣[ⲛ]ⲧ̣ⲁϩ{ⲉ̅[̅ⲓ}] ⲉⲃⲟⲗ̣ <text:line-break/><text:span text:style-name="T1"> </text:span><text:span text:style-name="T2">(16/11) </text:span> ⲛ̅ϩⲏⲧⲕ̅’ ⲉⲧⲟⲩⲁⲁ̣[ⲃ ⲉⲧⲟ]ⲛ̣ϩ̅ ⲁⲩⲱ̣ 〈ⲕⲁⲧⲁ〉 <text:line-break/><text:span text:style-name="T1"> </text:span><text:span text:style-name="T2">(16/12) </text:span> ⲛ̅ⲛⲟⲙⲟⲥ ⲛ̅ⲧⲉ[ⲗⲉⲓⲟⲥ] ϯⲛⲁϫ̣ⲉ̣ <text:line-break/><text:span text:style-name="T1"> </text:span><text:span text:style-name="T2">(16/13) </text:span> [ⲡ]ⲁⲣⲁⲛ ⲉⲉⲓϫⲓ ⲃⲁⲡⲧ[ⲓⲥ]ⲙⲁ̣ [ⲧⲉ] <text:line-break/><text:span text:style-name="T1"> </text:span><text:span text:style-name="T2">(16/14) </text:span> ⲛ̣ⲟⲩ ⲛ̅ϣⲁ ⲉⲛⲉϩ ϩⲛ̅ ⲛ̅ⲣ[ⲁⲛ ⲉⲧⲟ]‐ <text:line-break/><text:span text:style-name="T1"> </text:span><text:span text:style-name="T2">(16/15) </text:span> ⲛϩ̅ ⲉⲧⲟⲩⲁⲁⲃ· ⲁⲩⲱ ϩⲛ̅ ⲛ̣[ⲙ̅ⲟⲩ]‐ <text:line-break/><text:span text:style-name="T1"> </text:span><text:span text:style-name="T2">(16/16) </text:span> [ⲉⲓ]ⲟ̣ⲟⲩⲉ ϩⲁⲙⲏ[ⲛ· ̅ⲕ̅ⲟ̅]̅ⲩ̅[̅ⲁ̅ⲁ̅ⲃ̅]̅ <text:line-break/><text:span text:style-name="T1"> </text:span><text:span text:style-name="T2">(16/17) </text:span> [ⲕ̅ⲟ̅]̅ⲩ̅ⲁ̅ⲁ̅ⲃ̅ ⲕ̅ⲟⲩⲁⲁ̣ⲃ̅ ⲱ̣͂ ⲡⲓ̣[ⲱⲧ’] <text:line-break/><text:span text:style-name="T1"> </text:span><text:span text:style-name="T2">(16/18) </text:span> [ⲙ̅ⲡⲧⲏⲣϥ̅] ⲉⲧ’ϣⲟⲟⲡ’ ⲛⲁⲙ̣[ⲉ <text:line-break/><text:span text:style-name="T1"> </text:span><text:span text:style-name="T2">(16/19) </text:span> [....]ϣⲟⲟⲡ’ [ⲁ]ⲛ ⲁ̅ⲃ̣̅̅[̅ⲉ̅ⲗ̅ ⲃ̅ⲟⲣ]ⲟ̣ⲩ[ⲭ]̅ <text:line-break/><text:span text:style-name="T1"> </text:span><text:span text:style-name="T2">(16/20) </text:span> [...ϣ]ⲁ̣ ⲉⲛⲉϩ [ⲛ̅ⲉ]ⲛ̣ⲉ̣ϩ̣ [ϩⲁⲙ]ⲏⲛ· <text:line-break/><text:span text:style-name="T1"> </text:span><text:span text:style-name="T2">(16/21) </text:span> [ⲕ̅ⲟ̅]̅ⲩ̣̅̅ⲁ̅ⲁ̅ⲃ̣ [ⲕ̅ⲟ]ⲩ̣ⲁⲁ̣̅[ⲃ ⲕ̅ⲟ]ⲩⲁⲁ̅ⲃ <text:line-break/><text:span text:style-name="T1"> </text:span><text:span text:style-name="T2">(16/22) </text:span> [ 8+- ]ⲡ’̣ ϩⲁⲧ̣[ <text:line-break/><text:span text:style-name="T1"> </text:span><text:span text:style-name="T2">(16/23) </text:span> [ 7+-]ⲁ̅ⲍ̅ ϣ̣[ⲁ ⲉⲛⲉϩ ⲛ̅ⲉ]ⲛⲉϩ̣ <text:line-break/><text:span text:style-name="T1"> </text:span><text:span text:style-name="T2">(16/24) </text:span> [ϩⲁⲙⲏⲛ· ⲧⲉ̅]̅ⲟ̅ⲩ̅ⲁ̅ⲁ̅ⲃ̅[· ⲧ̅ⲉⲟ]ⲩⲁⲁ̅ⲃ <text:line-break/><text:span text:style-name="T1"> </text:span><text:span text:style-name="T2">(16/25) </text:span> [ⲧ̅ⲉ̅ⲟ̅ⲩ̅ⲁ̅ⲁ̅ⲃ̅ ⲧⲙ]ⲁⲁⲩ [ⲛ̅ⲛ]ⲁⲓⲱⲛ <text:line-break/><text:span text:style-name="T1"> </text:span><text:span text:style-name="T2">(16/26) </text:span> ⟦ϣ̣ⲁ ⲉⲛⲉϩ ⲛ̅ⲉ⟧ ⲧ̅ⲃ̅ⲁ̅[̅ⲣ̅]̅ⲃ̣̅̅ⲏ̅ⲗ̅ⲱ̅ⲛ <text:line-break/><text:span text:style-name="T1"> </text:span><text:span text:style-name="T2">(16/27) </text:span> [ϣ]ⲁ ⲉⲛⲉϩ ⲛ̅ⲉⲛⲉ[ϩ· ϩⲁ]ⲙ̣ⲏ̣ⲛ̣· <text:line-break/><text:span text:style-name="T1"> </text:span><text:span text:style-name="T2">(16/28) </text:span> [ⲕ̅ⲟ̅]̅ⲩ̅[̅ⲁ̅ⲁ̅ⲃ̅] ⲕⲟ̅ⲩⲁⲁⲃ̅ ⲕⲟ̅ⲩⲁⲁⲃ̅ <text:line-break/><text:span text:style-name="T1"> </text:span><text:span text:style-name="T2">(16/29) </text:span> [ⲡϣⲣ]ⲡ̣̅ ⲙ̅ⲙⲓⲥⲉ ⲛ̅ⲛⲁⲓⲱⲛ [ⲇ̅ⲟ̅]‐ <text:line-break/><text:span text:style-name="T1"> </text:span><text:span text:style-name="T2">(16/30) </text:span> [ⲝ̅ⲟ̅]̅ⲙ̅ⲉ̅ⲇ̅ⲱ̅ⲛ̅· ⲡⲉ[...]ϫ̣.[ <text:line-break/><text:span text:style-name="T1"> </text:span><text:span text:style-name="T2">(17/1) </text:span> [.....ϣⲁ ⲉⲛⲉ]ϩ ⲛ̅ⲉⲛⲉϩ ϩⲁⲙⲏⲛ· <text:line-break/><text:span text:style-name="T1"> </text:span><text:span text:style-name="T2">(17/2) </text:span> [ⲕ̅ⲟ̅ⲩ̅ⲁ̅ⲁ̅ⲃ̅· ⲕ̅ⲟⲩⲁⲁⲃ̅·] ⲕ̅ⲟ̣ⲩ̣ⲁ̣ⲁ̣ⲃ̣̅ <text:line-break/><text:span text:style-name="T1"> </text:span><text:span text:style-name="T2">(17/3) </text:span> [ 15+- ]... <text:line-break/><text:span text:style-name="T1"> </text:span><text:span text:style-name="T2">(17/4) </text:span> [ 14+- ]ⲙ̅ⲁ̣̅̅ⲛ̅ <text:line-break/><text:span text:style-name="T1"> </text:span><text:span text:style-name="T2">(17/5) </text:span> [ϣⲁ ⲉⲛⲉϩ ⲛ̅ⲉⲛⲉ]ϩ̣ ϩ̣ⲁⲙⲏⲛ· <text:line-break/><text:span text:style-name="T1"> </text:span><text:span text:style-name="T2">(17/6) </text:span> [ⲕ̅ⲟ̅ⲩ̅ⲁ̅ⲁ̅ⲃ̅· ⲕ̅ⲟⲩⲁⲁ]ⲃ̅ ⲕ̣̅ⲟⲩⲁⲁⲃ̅ <text:line-break/><text:span text:style-name="T1"> </text:span><text:span text:style-name="T2">(17/7) </text:span> [ 14+- ]ⲥ <text:line-break/><text:span text:style-name="T1"> </text:span><text:span text:style-name="T2">(17/8) </text:span> [ 11+- ϣⲟⲣ]ⲡ̅ ⲛ̅ⲁⲓⲱⲛ <text:line-break/><text:span text:style-name="T1"> </text:span><text:span text:style-name="T2">(17/9) </text:span> [ϩⲁⲣⲙⲟⲍⲏⲗ· ϣⲁ ⲉ]ⲛ̣ⲉϩ ⲛ̅ⲉⲛⲉϩ <text:line-break/><text:span text:style-name="T1"> </text:span><text:span text:style-name="T2">(17/10) </text:span> [ϩⲁⲙⲏⲛ· ⲕ̅ⲟ̅ⲩ̅ⲁ̅]̅ⲁ̅ⲃ ⲕ̅ⲟⲩⲁⲁ̅ⲃ <text:line-break/><text:span text:style-name="T1"> </text:span><text:span text:style-name="T2">(17/11) </text:span> [ⲕ̅ⲟ̅ⲩ̅ⲁ̅ⲁ̅ⲃ̅· ⲡⲥⲧ]ⲣⲁⲧⲏⲅⲟⲥ ⲫⲱⲥ‐ <text:line-break/><text:span text:style-name="T1"> </text:span><text:span text:style-name="T2">(17/12) </text:span> [ⲧⲏⲣ ⲛ̅ⲛⲁⲓⲱⲛ] ⲱ̣ⲣⲓⲁⲏⲗ ⲛ̅ϣⲁ <text:line-break/><text:span text:style-name="T1"> </text:span><text:span text:style-name="T2">(17/13) </text:span> [ⲉⲛⲉϩ ⲛ̅ⲉⲛⲉϩ ϩ]ⲁⲙⲏⲛ· ⲕ̅ⲟ̅ⲩ̅[̅ⲁ̅ⲁ̅ⲃ̅]̅ <text:line-break/><text:span text:style-name="T1"> </text:span><text:span text:style-name="T2">(17/14) </text:span> [ⲕ̅ⲟ̅ⲩ̅ⲁ̅ⲁ̅ⲃ̅ ⲕ̅ⲟⲩⲁⲁⲃ̅ ⲡ]ⲥⲧⲣⲁ[ⲧⲏ]‐ <text:line-break/><text:span text:style-name="T1"> </text:span><text:span text:style-name="T2">(17/15) </text:span> [ⲅⲟⲥ ⲛ̅ⲛⲁⲓⲱⲛ] ⲡ̣ⲣⲙ̅ⲛ̅ⲟⲩⲟ‐ <text:line-break/><text:span text:style-name="T1"> </text:span><text:span text:style-name="T2">(17/16) </text:span> [ⲉⲓⲛ ⲇⲁⲩⲉⲓⲑⲉ] ⲛ̅ϣⲁ ⲉⲛⲉϩ <text:line-break/><text:span text:style-name="T1"> </text:span><text:span text:style-name="T2">(17/17) </text:span> [ⲛ̅ⲉⲛⲉϩ ϩⲁⲙ]ⲏⲛ· ⲕ̅ⲟ̅ⲩ̅ⲁ̅ⲁ̅ⲃ̅ <text:line-break/><text:span text:style-name="T1"> </text:span><text:span text:style-name="T2">(17/18) </text:span> [ⲕ̅ⲟ̅ⲩ̅ⲁ̅ⲁ̅ⲃ̅ ⲕ̅ⲟⲩⲁ]ⲁⲃ̅ ⲡⲁⲣⲭ[ⲓⲥⲧⲣ]ⲁ‐ <text:line-break/><text:span text:style-name="T1"> </text:span><text:span text:style-name="T2">(17/19) </text:span> [ⲧⲏⲅⲟⲥ ⲏⲗⲏⲗⲏⲑ].[.].ⲧ’̣ ⲛ̅[...]. <text:line-break/><text:span text:style-name="T1"> </text:span><text:span text:style-name="T2">(17/20) </text:span> [ 9+- ⲛ]ⲁⲓⲱ[ⲛ...]. <text:line-break/><text:span text:style-name="T1"> </text:span><text:span text:style-name="T2">(17/21) </text:span> [ 10+- ]ⲛ̣ⲟ̣[ <text:line-break/><text:span text:style-name="T1"> </text:span><text:span text:style-name="T2">(17/22) </text:span> (1 line missing) <text:line-break/><text:soft-page-break/><text:span text:style-name="T1"> </text:span><text:span text:style-name="T2">(17/23) </text:span> [ 10+- ]ⲛⲛⲁⲣ[ <text:line-break/><text:span text:style-name="T1"> </text:span><text:span text:style-name="T2">(17/24) </text:span> [ 10+- ]ⲙ̅ⲁ̅ⲛ̅ [ϣⲁ] <text:line-break/><text:span text:style-name="T1"> </text:span><text:span text:style-name="T2">(17/25) </text:span> [ⲉⲛⲉϩ ⲛ̅ⲉⲛⲉϩ] ϩⲁⲙ[ⲏⲛ·] <text:line-break/><text:span text:style-name="T1"> </text:span><text:span text:style-name="T2">(17/26) </text:span> [ⲕ̅ⲟ̅ⲩ̅ⲁ̅ⲁ̅ⲃ̅ ⲕ̅ⲟⲩ]ⲁⲁⲃ̅ ⲕ̅ⲟ[ⲩⲁⲁⲃ̅] <text:line-break/><text:span text:style-name="T1"> </text:span><text:span text:style-name="T2">(17/27) </text:span> [ⲡⲛⲟⲩⲧⲉ ⲉⲧⲛ]ⲁⲛⲟⲩϥ̣ [ⲛ̅]‐ <text:line-break/><text:span text:style-name="T1"> </text:span><text:span text:style-name="T2">(18/1) </text:span> ⲛ̅ⲕⲟ̣ⲥⲙⲟⲥ ⲉ̣[ⲧⲣ̅ ϣⲁⲩ‐ <text:line-break/><text:span text:style-name="T1"> </text:span><text:span text:style-name="T2">(18/2) </text:span> ⲙⲉⲓⲣⲟⲭⲉⲓ̣[ⲣⲟⲑⲉⲧⲟⲩ ϣⲁ] <text:line-break/><text:span text:style-name="T1"> </text:span><text:span text:style-name="T2">(18/3) </text:span> ⲉⲛⲉϩ̣ ⲛ̅ⲉ̣ⲛ̣ⲉ̣[ϩ ϩⲁⲙⲏⲛ·] <text:line-break/><text:span text:style-name="T1"> </text:span><text:span text:style-name="T2">(18/4) </text:span> ⲕ̣̅̅ⲟ̣̅̅[̅ⲩ̅ⲁ̅ⲁ̅ⲃ̅ ⲕ̅ⲟⲩⲁⲁⲃ̅ ⲕ̅ⲟⲩⲁⲁⲃ̅] <text:line-break/><text:span text:style-name="T1"> </text:span><text:span text:style-name="T2">(18/5) </text:span> ⲡⲁⲣⲭⲓⲥ̣[ⲧⲣⲁⲧⲏⲅⲟⲥ ⲙ̅ⲡⲧⲏ]‐ <text:line-break/><text:span text:style-name="T1"> </text:span><text:span text:style-name="T2">(18/6) </text:span> ⲣϥ̅ ⲓ̅ⲥ̅ ⲡⲉⲭ̣̅ⲥ̣̅ [ϣⲁ ⲉⲛⲉϩ ⲛ̅ⲉⲛⲉϩ] <text:line-break/><text:span text:style-name="T1"> </text:span><text:span text:style-name="T2">(18/7) </text:span> ϩⲁⲙⲏⲛ· ⲁ̣[ <text:line-break/><text:span text:style-name="T1"> </text:span><text:span text:style-name="T2">(18/8) </text:span> ⲧⲉⲓⲁ ⲙⲛ̣̅[ <text:line-break/><text:span text:style-name="T1"> </text:span><text:span text:style-name="T2">(18/9) </text:span> ⲛⲉⲉⲓⲉ[ⲧ%1 8+- ϩⲟⲙⲟ]‐ <text:line-break/><text:span text:style-name="T1"> </text:span><text:span text:style-name="T2">(18/10) </text:span> ⲗⲟⲅⲓⲁ· ⲁ̣[ⲩⲱ.....ⲣ̅ϩⲟⲙⲟ]‐ <text:line-break/><text:span text:style-name="T1"> </text:span><text:span text:style-name="T2">(18/11) </text:span> ⲗⲟⲅⲉ̣ⲓ ⲙ̅ⲙ̣[ⲟ]ϥ̣ [ <text:line-break/><text:span text:style-name="T1"> </text:span><text:span text:style-name="T2">(18/12) </text:span> ⲟⲩ ⲛ̅ⲧⲉⲩⲛⲟ̣[ⲩ <text:line-break/><text:span text:style-name="T1"> </text:span><text:span text:style-name="T2">(18/13) </text:span> ϭⲉ ⲥϣⲱⲡⲉ ⲙ̅[ <text:line-break/><text:span text:style-name="T1"> </text:span><text:span text:style-name="T2">(18/14) </text:span> ⲡ̣ⲉ ⲛ̅ϩⲣ̅ⲧⲉ ⲙ[ⲛ̅ <text:line-break/><text:span text:style-name="T1"> </text:span><text:span text:style-name="T2">(18/15) </text:span> ⲛ̅ϩⲣ̅[ⲧ]ⲉ ⲙⲛ̣̅[ <text:line-break/><text:span text:style-name="T1"> </text:span><text:span text:style-name="T2">(18/16) </text:span> ϣ̣[ⲧ]ⲟⲣⲧⲣ̅.[ <text:line-break/><text:span text:style-name="T1"> </text:span><text:span text:style-name="T2">(18/17) </text:span> ⲉϥⲕⲱⲧⲉ ⲉⲣ̣ⲟ̣[ⲟⲩ <text:line-break/><text:span text:style-name="T1"> </text:span><text:span text:style-name="T2">(18/18) </text:span> ϩⲙ̅ ⲡⲧⲟⲡⲟⲥ ⲉ̣[ⲧⲉⲩⲛ̅ⲧⲁϥ ⲛ̅ⲟⲩ]‐ <text:line-break/><text:span text:style-name="T1"> </text:span><text:span text:style-name="T2">(18/19) </text:span> ⲛⲟϭ ⲛ̅ⲕⲁⲕⲉ̣ [ⲙ̅ⲙⲁⲩ ⲛ̅ϩⲏⲧϥ] <text:line-break/><text:span text:style-name="T1"> </text:span><text:span text:style-name="T2">(18/20) </text:span> ⲁ̣[ⲩ]ⲱ ϩⲁϩ ⲛ̅[ <text:line-break/><text:span text:style-name="T1"> </text:span><text:span text:style-name="T2">(18/21) </text:span> ⲟ̣ⲩⲱⲛϩ̅ ⲉ[ⲃⲟⲗ <text:line-break/><text:span text:style-name="T1"> </text:span><text:span text:style-name="T2">(18/22) </text:span> ⲉ[ⲧⲙ̅]ⲙ̣ⲁⲩ·.[ <text:line-break/><text:span text:style-name="T1"> </text:span><text:span text:style-name="T2">(18/23) </text:span> (1 line missing) <text:line-break/><text:span text:style-name="T1"> </text:span><text:span text:style-name="T2">(18/24) </text:span> [....]ⲟ.[ <text:line-break/><text:span text:style-name="T1"> </text:span><text:span text:style-name="T2">(18/25) </text:span> [...].ⲉϩⲧ[ <text:line-break/><text:span text:style-name="T1"> </text:span><text:span text:style-name="T2">(18/26) </text:span> [.....]ⲟⲩ[ <text:line-break/><text:span text:style-name="T1"> </text:span><text:span text:style-name="T2">(18/27) </text:span> [.....]ⲉϩ[ <text:line-break/><text:span text:style-name="T1"> </text:span><text:span text:style-name="T2">(19/1) </text:span> [ 12+- ]ⲉ· ⲁⲩⲱ <text:line-break/><text:span text:style-name="T1"> </text:span><text:span text:style-name="T2">(19/2) </text:span> [ 11+- ⲉ]ⲩϭⲟⲗⲉ ⲙ̅ <text:line-break/><text:span text:style-name="T1"> </text:span><text:span text:style-name="T2">(19/3) </text:span> [ 12+- ] ⲧ[ⲏ]ⲣ̣[ϥ̅] ⲙⲛ̅ <text:line-break/><text:span text:style-name="T1"> </text:span><text:span text:style-name="T2">(19/4) </text:span> [ 11+- ] ⲙ̅ⲙⲁⲩ ⲙ̅ <text:line-break/><text:span text:style-name="T1"> </text:span><text:span text:style-name="T2">(19/5) </text:span> [ 13+- ]ⲉ· ⲁⲩⲱ <text:line-break/><text:span text:style-name="T1"> </text:span><text:span text:style-name="T2">(19/6) </text:span> [ 11+- ].ⲟ ⲛ̅ⲑⲉ ⲙ̅ <text:line-break/><text:span text:style-name="T1"> </text:span><text:span text:style-name="T2">(19/7) </text:span> [ 11+- ]ⲩ ⲙ̅ⲙⲟⲟⲩ <text:line-break/><text:span text:style-name="T1"> </text:span><text:span text:style-name="T2">(19/8) </text:span> [ 10+- ]..[ <text:line-break/><text:span text:style-name="T1"> </text:span><text:span text:style-name="T2">(19/9) </text:span> [ 10+- ]..[..].[...]ⲕ <text:line-break/><text:span text:style-name="T1"> </text:span><text:span text:style-name="T2">(19/10) </text:span> [ 7+- ϩ]ⲉⲛⲧⲁⲣⲁⲭⲏ [ⲁ]ⲩϯ <text:line-break/><text:span text:style-name="T1"> </text:span><text:span text:style-name="T2">(19/11) </text:span> [ 9+- ]ⲡ̣ⲉ ⲛⲟⲩϣ̣ⲁ̣ϫⲉ̣ <text:line-break/><text:span text:style-name="T1"> </text:span><text:span text:style-name="T2">(19/12) </text:span> [ 7+- ⲁ]ⲩⲱ ⲡⲉϫⲁⲩ ⲛⲁⲓ̈ <text:line-break/><text:span text:style-name="T1"> </text:span><text:span text:style-name="T2">(19/13) </text:span> [ϫⲉ.....ⲙⲉⲗ]ϫ̣ⲓⲥ[ⲉⲇ]ⲉ̣ⲕ’̣ <text:line-break/><text:span text:style-name="T1"> </text:span><text:span text:style-name="T2">(19/14) </text:span> [ⲡⲟⲩⲏⲏⲃ] ⲙ̣̅ⲡⲛⲟⲩⲧⲉ [ⲉⲧ’ϫⲟ]‐ <text:line-break/><text:span text:style-name="T1"> </text:span><text:span text:style-name="T2">(19/15) </text:span> [ⲥⲉ ⲁⲩϣ]ⲁϫⲉ ϩⲱⲥ̣[.....]ⲉ <text:line-break/><text:soft-page-break/><text:span text:style-name="T1"> </text:span><text:span text:style-name="T2">(19/16) </text:span> [....ⲛⲟ]ⲩⲧⲁⲡⲣ[ⲟ] .[ <text:line-break/><text:span text:style-name="T1"> </text:span><text:span text:style-name="T2">(19/17) </text:span> [......] ϩⲙ̅ ⲡⲧⲏ̣ⲣϥ̅ ⲁ[.].[ <text:line-break/><text:span text:style-name="T1"> </text:span><text:span text:style-name="T2">(19/18) </text:span> [ 7+- ]ϥ̣ⲛ̅[. ⲁ]ⲩⲱ ⲡ.[ <text:line-break/><text:span text:style-name="T1"> </text:span><text:span text:style-name="T2">(19/19) </text:span> [ 11+- ] ⲛⲉⲕ[..]ⲉ <text:line-break/><text:span text:style-name="T1"> </text:span><text:span text:style-name="T2">(19/20) </text:span> [ 11+- ]..[...]ⲕ̣ <text:line-break/><text:span text:style-name="T1"> </text:span><text:span text:style-name="T2">(19/21) </text:span> (3 lines missing) <text:line-break/><text:span text:style-name="T1"> </text:span><text:span text:style-name="T2">(19/24) </text:span> [ 11+- ⲣ̅]ⲡ̣[ⲗ]ⲁⲛ̣ⲁ̣ <text:line-break/><text:span text:style-name="T1"> </text:span><text:span text:style-name="T2">(19/25) </text:span> [ 12+- ]ⲁϥⲣ̅ⲫ[ <text:line-break/><text:span text:style-name="T1"> </text:span><text:span text:style-name="T2">(19/26) </text:span> [ 15+- ].[ <text:line-break/><text:span text:style-name="T1"> </text:span><text:span text:style-name="T2">(19/27) </text:span> (+-2 lines missing) <text:line-break/><text:span text:style-name="T1"> </text:span><text:span text:style-name="T2">(20/1) </text:span> ⲙⲛ̣̅ ⲛⲉϥⲡ[ <text:line-break/><text:span text:style-name="T1"> </text:span><text:span text:style-name="T2">(20/2) </text:span> ⲟⲩⲱϣⲧ̅’ ⲙ̣[ⲛ̅ <text:line-break/><text:span text:style-name="T1"> </text:span><text:span text:style-name="T2">(20/3) </text:span> ⲡⲓⲥⲧ̣ⲓ̣[ⲥ] ⲙ̣[ⲛ̅ <text:line-break/><text:span text:style-name="T1"> </text:span><text:span text:style-name="T2">(20/4) </text:span> ⲛⲉϥϣⲗⲏⲗ· ⲁⲩ[ⲱ <text:line-break/><text:span text:style-name="T1"> </text:span><text:span text:style-name="T2">(20/5) </text:span> ⲛⲟⲟⲩⲉ· ⲁⲩ[ⲱ <text:line-break/><text:span text:style-name="T1"> </text:span><text:span text:style-name="T2">(20/6) </text:span> ⲛ̣̅ⲛⲉⲧⲉ ⲛⲟⲩ[ϥ ⲛⲉ <text:line-break/><text:span text:style-name="T1"> </text:span><text:span text:style-name="T2">(20/7) </text:span> ⲛ̅ϣⲟⲣⲡ̅’ ⲉⲛ̣[ <text:line-break/><text:span text:style-name="T1"> </text:span><text:span text:style-name="T2">(20/8) </text:span> ⲁⲥ̣.[.].[..]ⲕ’ ⲇ[ⲉ <text:line-break/><text:span text:style-name="T1"> </text:span><text:span text:style-name="T2">(20/9) </text:span> ⲣⲟ[ <text:line-break/><text:span text:style-name="T1"> </text:span><text:span text:style-name="T2">(20/10) </text:span> ⲙ̅ⲡⲟ[ⲩ]ⲣⲟⲟⲩϣ ϫⲉ [ⲑⲓⲉⲣⲱ]‐ <text:line-break/><text:span text:style-name="T1"> </text:span><text:span text:style-name="T2">(20/11) </text:span> ⲥⲩⲛ̣ⲏ̣ ⲉⲧⲕ̅’ⲉⲓⲣ[ⲉ ⲙ̅ⲙⲟⲥ ⲉ]‐ <text:line-break/><text:span text:style-name="T1"> </text:span><text:span text:style-name="T2">(20/12) </text:span> ⲧ̣ⲉ [ⲟ]ⲩⲉⲃⲟⲗ ϩⲙ̅ [ <text:line-break/><text:span text:style-name="T1"> </text:span><text:span text:style-name="T2">(20/13) </text:span> [.]ⲕⲉ[..]ⲛⲁ.[ <text:line-break/><text:span text:style-name="T1"> </text:span><text:span text:style-name="T2">(20/14) </text:span> [ϩⲛ̅ ⲛ̅ⲥⲩ]ⲙⲃⲟⲩⲗ̣ⲓ̣ⲁ ⲛ̣̅[ <text:line-break/><text:span text:style-name="T1"> </text:span><text:span text:style-name="T2">(20/15) </text:span> [....]ⲥⲁⲧⲁⲛⲁⲥ ⲉ[ <text:line-break/><text:span text:style-name="T1"> </text:span><text:span text:style-name="T2">(20/16) </text:span> ⲛ[ⲙ̅...ⲉ]ⲃⲟⲗ· ⲑ̣ⲩ̣[ⲥⲓⲁ <text:line-break/><text:span text:style-name="T1"> </text:span><text:span text:style-name="T2">(20/17) </text:span> .[....] ⲛⲉϥⲥⲃⲟ[ⲟⲩⲉ <text:line-break/><text:span text:style-name="T1"> </text:span><text:span text:style-name="T2">(20/18) </text:span> [.]ⲉ̣ ⲉⲛⲉⲕ̣ⲙⲟ.[ <text:line-break/><text:span text:style-name="T1"> </text:span><text:span text:style-name="T2">(20/19) </text:span> .[.]ⲟⲩⲧ[ <text:line-break/><text:span text:style-name="T1"> </text:span><text:span text:style-name="T2">(20/20) </text:span> ⲙ̅[ⲡ]ⲉⲓ̈ⲁⲓⲱ[ⲛ <text:line-break/><text:span text:style-name="T1"> </text:span><text:span text:style-name="T2">(20/21) </text:span> ⲛ̣[ <text:line-break/><text:span text:style-name="T1"> </text:span><text:span text:style-name="T2">(20/22) </text:span> (3 lines missing) <text:line-break/><text:span text:style-name="T1"> </text:span><text:span text:style-name="T2">(20/25) </text:span> [ⲉⲧ’]ϣⲟⲟⲡ’ ϩ[ⲛ̅ <text:line-break/><text:span text:style-name="T1"> </text:span><text:span text:style-name="T2">(20/26) </text:span> [...]ⲣ̅ⲡ̣ⲗ̣[ⲁⲛⲁ <text:line-break/><text:span text:style-name="T1"> </text:span><text:span text:style-name="T2">(20/27) </text:span> (+-2 lines missing) <text:line-break/><text:span text:style-name="T1"> </text:span><text:span text:style-name="T2">(21/1) </text:span> [ 12+- ] ⲁⲩⲱ ϩⲉⲛ <text:line-break/><text:span text:style-name="T1"> </text:span><text:span text:style-name="T2">(21/2) </text:span> [ 11+- ]ⲓⲛ· ⲁ̣[ⲩ]ⲱ [ <text:line-break/><text:span text:style-name="T1"> </text:span><text:span text:style-name="T2">(21/3) </text:span> [ 11+- ]ⲁ̣ⲛⲁ̣[.]ⲟⲩ[ <text:line-break/><text:span text:style-name="T1"> </text:span><text:span text:style-name="T2">(21/4) </text:span> [ 10+- ⲁ]ϥⲧⲁⲁⲩ ⲉ[ <text:line-break/><text:span text:style-name="T1"> </text:span><text:span text:style-name="T2">(21/5) </text:span> [ 12+- ⲁ]ⲩⲱ [ <text:line-break/><text:span text:style-name="T1"> </text:span><text:span text:style-name="T2">(21/6) </text:span> [ 9+- ⲁⲩ]ⲱ ⲓ̅ⲅ̅’̅ ⲥ̣[ <text:line-break/><text:span text:style-name="T1"> </text:span><text:span text:style-name="T2">(21/7) </text:span> (+-22 lines missing) <text:line-break/><text:span text:style-name="T1"> </text:span><text:span text:style-name="T2">(22/1) </text:span> ⲛ̣ⲟⲩϫⲉ ⲙ̅ⲙ[ⲟϥ <text:line-break/><text:span text:style-name="T1"> </text:span><text:span text:style-name="T2">(22/2) </text:span> [ϫ]ⲉⲕⲁ[ⲁⲥ] ⲉⲕ[ <text:line-break/><text:span text:style-name="T1"> </text:span><text:span text:style-name="T2">(22/3) </text:span> [......]ⲣ̣[ <text:line-break/><text:span text:style-name="T1"> </text:span><text:span text:style-name="T2">(22/4) </text:span> [ϫ]ⲉ ⲛ̅ⲧⲉⲩⲛⲟⲩ [ <text:line-break/><text:span text:style-name="T1"> </text:span><text:span text:style-name="T2">(22/5) </text:span> [ⲉⲃⲟ]ⲗ ϩⲓ̅ⲧⲟ̣[ⲟⲧϥ̅ <text:line-break/><text:soft-page-break/><text:span text:style-name="T1"> </text:span><text:span text:style-name="T2">(22/6) </text:span> [ϩⲁⲡⲉ]ⲥ̣ⲏⲧ’ ⲡ[ <text:line-break/><text:span text:style-name="T1"> </text:span><text:span text:style-name="T2">(22/7) </text:span> (+-22 lines missing) <text:line-break/><text:span text:style-name="T1"> </text:span><text:span text:style-name="T2">(24/1) </text:span> [ⲅ]ⲁⲣ ⲉⲃⲟⲗ.[ <text:line-break/><text:span text:style-name="T1"> </text:span><text:span text:style-name="T2">(24/2) </text:span> [ⲉ]ⲧ̣ⲙ̅ ⲡⲥⲁ̣ⲛ[ⲧⲡⲉ <text:line-break/><text:span text:style-name="T1"> </text:span><text:span text:style-name="T2">(24/3) </text:span> (+- 26 lines missing) <text:line-break/><text:span text:style-name="T1"> </text:span><text:span text:style-name="T2">(25/1) </text:span> [ 8+- ]ⲙ̣̅ⲙ̣ⲟⲉⲓ· ⲁⲩⲱ <text:line-break/><text:span text:style-name="T1"> </text:span><text:span text:style-name="T2">(25/2) </text:span> [ 8+- ⲁ]ⲧⲉⲧⲛ̅ⲣⲱϩⲧ̅’̣ <text:line-break/><text:span text:style-name="T1"> </text:span><text:span text:style-name="T2">(25/3) </text:span> [ 9+- ]ⲁⲧⲉⲧⲛ̅ⲛⲟϫⲧ’̣ <text:line-break/><text:span text:style-name="T1"> </text:span><text:span text:style-name="T2">(25/4) </text:span> [ 9+- ]ⲡⲧⲱⲙⲁ· ⲁⲩⲱ <text:line-break/><text:span text:style-name="T1"> </text:span><text:span text:style-name="T2">(25/5) </text:span> [ⲁⲧⲉⲧⲛ̅ⲁϣⲧ’] ϫⲓⲛ ⲛ̅ϫⲡ̅’ ϣⲟ[ⲙ]‐ <text:line-break/><text:span text:style-name="T1"> </text:span><text:span text:style-name="T2">(25/6) </text:span> [ⲧⲉ ⲛ̅ⲧⲉ ⲡⲡⲣⲟ]ⲥⲁⲃⲃⲁ[ⲧ]ⲟⲛ ϣⲁ <text:line-break/><text:span text:style-name="T1"> </text:span><text:span text:style-name="T2">(25/7) </text:span> [ⲡⲛⲁⲩ ⲛ̅ϫⲡ̅’ ⲯⲓⲧ]ⲉ· ⲁⲩ[ⲱ ⲙ]ⲛ̅ⲛ̅‐ <text:line-break/><text:span text:style-name="T1"> </text:span><text:span text:style-name="T2">(25/8) </text:span> [ⲥⲁ ⲛⲁⲓ̈ ⲁⲉⲓⲧⲱ]ⲱⲛ ⲉⲃⲟⲗ ϩⲛ̅ ⲛⲉⲧ’‐ <text:line-break/><text:span text:style-name="T1"> </text:span><text:span text:style-name="T2">(25/9) </text:span> [ⲙⲟⲟⲩⲧ’.....]ⲙⲁ {ⲉ̅ⲓ} ⲉⲃ̣[ⲟⲗ ϩ]ⲙ̅ <text:line-break/><text:span text:style-name="T1"> </text:span><text:span text:style-name="T2">(25/10) </text:span> [......ⲉϩⲟ]ⲩⲛ ⲉⲣⲟⲓ̈ .[..]ⲧ̣ⲉ <text:line-break/><text:span text:style-name="T1"> </text:span><text:span text:style-name="T2">(25/11) </text:span> [ 10+- ] ⲁⲛⲁⲃⲁⲗ ⲛ̣[ⲁⲩ <text:line-break/><text:span text:style-name="T1"> </text:span><text:span text:style-name="T2">(25/12) </text:span> [ 7+- ⲙ̅ⲡⲟⲩ]ϭⲛ̅ ⲗⲁⲁ̣[ⲩ <text:line-break/><text:span text:style-name="T1"> </text:span><text:span text:style-name="T2">(25/13) </text:span> [ 11+- ]ⲉϩⲣ[ⲁⲓ̈ <text:line-break/><text:span text:style-name="T1"> </text:span><text:span text:style-name="T2">(25/14) </text:span> [ 11+- ⲙ̅]ⲙⲟⲉ̣[ⲓ <text:line-break/><text:span text:style-name="T1"> </text:span><text:span text:style-name="T2">(25/15) </text:span> (+-14 lines missing) <text:line-break/><text:span text:style-name="T1"> </text:span><text:span text:style-name="T2">(26/1) </text:span> ⲁⲥⲡⲁⲍⲉ ⲙ̅ⲙ[ⲟⲉⲓ.....ⲡⲉ]‐ <text:line-break/><text:span text:style-name="T1"> </text:span><text:span text:style-name="T2">(26/2) </text:span> ϫⲁⲩ ⲛⲁⲓ̈ ϫⲉ ϭⲙ̅[ϭⲟⲙ ⲱ͂ ⲙⲉⲗϫⲓ]‐ <text:line-break/><text:span text:style-name="T1"> </text:span><text:span text:style-name="T2">(26/3) </text:span> [ⲥ]ⲉ̣ⲇⲉⲕ’ ⲡⲛⲟϭ [ⲛ̅ⲁⲣⲭⲓⲉⲣⲉⲩⲥ] <text:line-break/><text:span text:style-name="T1"> </text:span><text:span text:style-name="T2">(26/4) </text:span> ⲛ̣̅ⲧⲉ ⲡⲛⲟⲩⲧⲉ [ⲉⲧϫⲟⲥⲉ ϫⲉ ⲛⲁⲣ]‐ <text:line-break/><text:span text:style-name="T1"> </text:span><text:span text:style-name="T2">(26/5) </text:span> ⲭ̣ⲱⲛ ⲉⲧⲉ ⲛⲉⲕ̣[ϫⲁϫⲉ ⲛⲉ ⲁⲩⲣ̅ ⲡⲟ]‐ <text:line-break/><text:span text:style-name="T1"> </text:span><text:span text:style-name="T2">(26/6) </text:span> ⲗⲉⲙ̣ⲟⲥ ⲁⲕϫ[ⲣⲟ ⲉⲣⲟⲟⲩ ⲁⲩⲱ] <text:line-break/><text:span text:style-name="T1"> </text:span><text:span text:style-name="T2">(26/7) </text:span> ⲙ̅ⲡⲟ̣[ⲩ]ϫ̣ⲣⲟ ⲉⲣⲟ[ⲕ’ ⲁⲩⲱ ⲁⲕⲣ̅]‐ <text:line-break/><text:span text:style-name="T1"> </text:span><text:span text:style-name="T2">(26/8) </text:span> ϩⲩⲡ̣[ⲟ]ⲙ̣ⲓⲛⲉ ⲁⲩ[ⲱ ⲁⲕⲣ̅ⲕⲁⲧⲁ]‐ <text:line-break/><text:span text:style-name="T1"> </text:span><text:span text:style-name="T2">(26/9) </text:span> ⲗⲩⲉ ⲛ̅ⲛⲉⲕ’ϫⲓϫ[ⲉⲉⲩ <text:line-break/><text:span text:style-name="T1"> </text:span><text:span text:style-name="T2">(26/10) </text:span> ⲧⲉ̣[...]ⲗ ⲛ̅ⲛⲟⲩ[ <text:line-break/><text:span text:style-name="T1"> </text:span><text:span text:style-name="T2">(26/11) </text:span> ⲛⲁ̣[ⲙ̅]ⲧⲟⲛ ϩⲛ̅ ⲗⲁⲁ[ⲩ <text:line-break/><text:span text:style-name="T1"> </text:span><text:span text:style-name="T2">(26/12) </text:span> [..ⲉ]ⲧⲁⲛϩ̅ ⲉⲧⲟ̣ⲩⲁ̣[ⲁⲃ <text:line-break/><text:span text:style-name="T1"> </text:span><text:span text:style-name="T2">(26/13) </text:span> [ⲛⲉⲧ’]ϫ̣[ⲓ]ⲥⲉ ϩⲏⲧϥ̅ ϩ[ⲛ̅ <text:line-break/><text:span text:style-name="T1"> </text:span><text:span text:style-name="T2">(26/14) </text:span> [..ⲥⲁ]ⲣⲁⲝ· [ <text:line-break/><text:span text:style-name="T1"> </text:span><text:span text:style-name="T2">(26/15) </text:span> [....]ϫ̣ⲟⲩ̣ [ <text:line-break/><text:span text:style-name="T1"> </text:span><text:span text:style-name="T2">(26/16) </text:span> (+- 13 lines missing) <text:line-break/><text:span text:style-name="T1"> </text:span><text:span text:style-name="T2">(27/1) </text:span> [ϩ]ⲛ̣̅ ⲙ̅ⲡⲣⲟⲥⲫⲟⲣⲁ· ⲉϥⲣ̅ ϩⲱⲃ̓ ⲉⲡ’ <text:line-break/><text:span text:style-name="T1"> </text:span><text:span text:style-name="T2">(27/2) </text:span> [ⲡ]ⲉⲧ’ⲛⲁⲛⲟⲩϥ ⲉϥⲣ̅ⲛⲏⲥⲧⲉⲩⲉ <text:line-break/><text:span text:style-name="T1"> </text:span><text:span text:style-name="T2">(27/3) </text:span> [ϩ]ⲛ̅ ⲛ̅ⲛⲏⲥⲧⲓⲁ· ⲛⲉⲉⲓⲁⲡⲟⲕⲁⲗⲩ‐ <text:line-break/><text:span text:style-name="T1"> </text:span><text:span text:style-name="T2">(27/4) </text:span> ⲯⲓⲥ ⲙ̅ⲡⲣ̅ϭⲁⲗⲡⲟⲩ ⲉⲃⲟⲗ ⲛ̅ⲗⲁⲁⲩ <text:line-break/><text:span text:style-name="T1"> </text:span><text:span text:style-name="T2">(27/5) </text:span> ⲉϥϩⲛ̅ ⲧⲥⲁⲣⲁⲝ ⲉⲩ〈ⲟ ⲛ̅〉ⲁⲧⲥⲁⲣⲁⲝ̓ <text:line-break/><text:span text:style-name="T1"> </text:span><text:span text:style-name="T2">(27/6) </text:span> ⲉⲩⲧⲙ̅ϭⲱⲗⲡ̅’ ⲉⲃⲟⲗ ⲛⲁⲕ’· ⲛ̅ <text:line-break/><text:span text:style-name="T1"> </text:span><text:span text:style-name="T2">(27/7) </text:span> ⲧⲁⲣⲟⲩϫⲉ ⲛⲁⲓ̈ ⲛ̅ϭⲓ ⲛ̅ⲥⲛⲏⲟⲩ <text:line-break/><text:span text:style-name="T1"> </text:span><text:span text:style-name="T2">(27/8) </text:span> ⲉⲧⲏⲡ’ ⲉⲛ̣ⲅⲉⲛⲉⲁ ⲙ̅ⲡⲱⲛϩ̅ ⲁⲩ <text:line-break/><text:span text:style-name="T1"> </text:span><text:span text:style-name="T2">(27/9) </text:span> ϫⲁⲥⲧⲟⲩ ⲉⲡⲥⲁⲛⲧⲡⲉ ⲛ̅ <text:line-break/><text:span text:style-name="T1"> </text:span><text:span text:style-name="T2">(27/10) </text:span> ⲙ̣̅ⲡⲏⲟ̣ⲩⲉ ⲧⲏⲣⲟⲩ [ϩⲁ]ⲙ̣ⲏⲛ· </text:p>
      <text:p text:style-name="P1"/>
      <text:p text:style-name="P3">( codex IX ) The Thought of Norea</text:p>
      <text:p text:style-name="P2"><text:span text:style-name="T1"> </text:span><text:span text:style-name="T2">(27/11) </text:span> ⲡⲓⲱⲧ’ ⲙ̅ⲡⲧⲏⲣϥ̅. ⲧⲉⲛ[ⲛⲟⲓⲁ] <text:line-break/><text:span text:style-name="T1"> </text:span><text:span text:style-name="T2">(27/12) </text:span> ⲙ̅ⲡⲟⲩⲟⲉⲓⲛ. ⲡⲛⲟⲩⲥ̣ [ⲉⲧⲟⲩ]‐ <text:line-break/><text:span text:style-name="T1"> </text:span><text:span text:style-name="T2">(27/13) </text:span> ⲏϩ ϩⲛ̅ ⲛⲉⲧ’ϫⲟⲥⲉ ⲉϩ̣[ⲣⲁⲓ̈] <text:line-break/><text:span text:style-name="T1"> </text:span><text:span text:style-name="T2">(27/14) </text:span> ⲉϫⲛ̅ ⲛⲉⲧⲙ̣̅ⲡⲥⲁ ⲙ̅ⲡ[ⲓⲧⲛ̅] <text:line-break/><text:span text:style-name="T1"> </text:span><text:span text:style-name="T2">(27/15) </text:span> ⲡ̣ⲟⲩⲟⲉⲓⲛ ⲉⲧ’ⲟⲩⲏϩ [ϩⲛ̅] <text:line-break/><text:span text:style-name="T1"> </text:span><text:span text:style-name="T2">(27/16) </text:span> [ⲛ]ⲉⲧ’ϫⲟⲥⲉ· ⲧⲥⲙⲏ ⲛ̅[ⲧⲉ] <text:line-break/><text:span text:style-name="T1"> </text:span><text:span text:style-name="T2">(27/17) </text:span> [ⲧ]ⲙⲉ ⲡ̣ⲛⲟⲩⲥ̣ ⲉⲧ’ⲥⲟⲩ[ⲧⲱⲛ] <text:line-break/><text:span text:style-name="T1"> </text:span><text:span text:style-name="T2">(27/18) </text:span> [ⲡ]ⲗⲟ̣ⲅⲟ̣ⲥ̣ ⲛ̅ⲁⲧ’ϭⲙ̅ϭⲱⲙ[ϥ̅] <text:line-break/><text:span text:style-name="T1"> </text:span><text:span text:style-name="T2">(27/19) </text:span> [ⲁ]ⲩⲱ ⲧⲥ̣ⲙⲏ ⲛ̅ⲛⲁⲧ’ϣ̣ⲁ̣[ϫⲉ] <text:line-break/><text:span text:style-name="T1"> </text:span><text:span text:style-name="T2">(27/20) </text:span> [ⲉ]ⲣ̣ⲟⲥ ⲡⲓⲱ̣ⲧ’ ⲛ̅ⲁⲧ’ⲧ̣[ⲁϩⲟϥ] <text:line-break/><text:span text:style-name="T1"> </text:span><text:span text:style-name="T2">(27/21) </text:span> ⲛⲱⲣⲉⲁ ⲧ̣ⲁ̣ⲓ̣̈ ⲉⲧⲁϣ[ⲕⲁⲕ ⲉ]‐ <text:line-break/><text:span text:style-name="T1"> </text:span><text:span text:style-name="T2">(27/22) </text:span> ϩⲣⲁⲓ̈ ⲉⲣⲟⲟⲩ ⲁⲩⲥⲱ[ⲧⲙ̅] <text:line-break/><text:span text:style-name="T1"> </text:span><text:span text:style-name="T2">(27/23) </text:span> ⲁⲩϫⲓⲧⲥ̅ ⲉϩⲟⲩⲛ ⲉⲡ̣ⲉⲥ̣ⲧⲟ‐ <text:line-break/><text:span text:style-name="T1"> </text:span><text:span text:style-name="T2">(27/24) </text:span> ⲡⲟⲥ ⲛ̅ⲟⲩⲟⲉⲓϣ ⲛⲓⲙ̓ ⲁⲩⲧⲁ‐ <text:line-break/><text:span text:style-name="T1"> </text:span><text:span text:style-name="T2">(27/25) </text:span> ⲁϥ ⲛⲁⲥ ⲙ̅ⲡⲓⲱⲧ’ ⲙ̅ⲡⲛⲟⲩⲥ <text:line-break/><text:span text:style-name="T1"> </text:span><text:span text:style-name="T2">(27/26) </text:span> ⲛ̣̅ⲁ̅ⲇ̅ⲁ̅ⲙ̣̅̅ⲁ̅ ⲙⲛ̅ ⲧⲕⲉⲥⲙⲏ̣ ⲛ̣̅‐ <text:line-break/><text:span text:style-name="T1"> </text:span><text:span text:style-name="T2">(27/27) </text:span> ⲧ̣ⲉ {ⲛ̅ⲧⲉ} ⲛ̣ⲉⲧ’ⲟⲩⲁⲁⲃ <text:line-break/><text:span text:style-name="T1"> </text:span><text:span text:style-name="T2">(28/1) </text:span> ϫⲉⲕⲁⲁⲥ ⲉⲥⲛⲁⲙ̅ⲧⲟⲛ ⲙ̅[ⲙⲟⲥ] <text:line-break/><text:span text:style-name="T1"> </text:span><text:span text:style-name="T2">(28/2) </text:span> ϩⲛ̅ ⲧⲉⲡⲓⲛⲛⲟⲓⲁ ⲛ̅ⲛⲁⲧ’ϣⲁϫ[ⲉ] <text:line-break/><text:span text:style-name="T1"> </text:span><text:span text:style-name="T2">(28/3) </text:span> ⲉⲣⲟ〈ⲥ〉· ϫⲉⲕⲁⲁⲥ ⲉ〈ⲥ〉ⲛⲁⲣ̅ⲕⲗ̣[ⲏ]‐ <text:line-break/><text:span text:style-name="T1"> </text:span><text:span text:style-name="T2">(28/4) </text:span> ⲣⲟⲛⲟⲙⲓ ⲙ̅ⲡϣⲟⲣⲡ̅’ ⲛ̅ⲛⲟⲩⲥ <text:line-break/><text:span text:style-name="T1"> </text:span><text:span text:style-name="T2">(28/5) </text:span> ⲉⲧⲁ〈ⲥ〉ϫⲓⲧϥ̅· ⲁⲩⲱ ⲛ̅〈ⲥ〉ⲙ̅ⲧⲟ̣[ⲛ] <text:line-break/><text:span text:style-name="T1"> </text:span><text:span text:style-name="T2">(28/6) </text:span> ⲙ̅ⲙⲟ〈ⲥ〉 ϩⲙ̅ ⲡⲁⲩⲧⲟⲅⲉⲛⲏⲥ <text:line-break/><text:span text:style-name="T1"> </text:span><text:span text:style-name="T2">(28/7) </text:span> ⲛ̅ⲛⲟⲩⲧⲉ· ⲁⲩⲱ ⲛ̅ⲥϫⲡⲟⲥ <text:line-break/><text:span text:style-name="T1"> </text:span><text:span text:style-name="T2">(28/8) </text:span> ⲟⲩⲁⲁⲥ ⲛ̅ⲑⲉ ϩⲱⲱϥ ⲟⲛ ⲛ̅ⲧⲁ̣[ⲥⲣ̅] <text:line-break/><text:span text:style-name="T1"> </text:span><text:span text:style-name="T2">(28/9) </text:span> ⲕⲗⲏⲣⲟⲛⲟⲙⲓ ⲙ̅ⲡⲗⲟⲅⲟⲥ ⲉⲧ̣[ⲟ]‐ <text:line-break/><text:span text:style-name="T1"> </text:span><text:span text:style-name="T2">(28/10) </text:span> ⲛϩ̣̅ ⲁ̣ⲩⲱ ⲛ̅ⲥϩⲱⲧⲡ̅’ ⲁⲛ[ⲁⲧ’] <text:line-break/><text:span text:style-name="T1"> </text:span><text:span text:style-name="T2">(28/11) </text:span> ⲧⲁ̣ⲕ̣ⲟ ⲧⲏⲣⲟⲩ· ⲁⲩⲱ ⲛ̣̅[ⲥϣⲁ]‐ <text:line-break/><text:span text:style-name="T1"> </text:span><text:span text:style-name="T2">(28/12) </text:span> [ϫⲉ] ϩⲙ̅ ⲡⲛⲟ〈ⲩ〉ⲥ ⲙ̅ⲡⲓⲱⲧ’· ⲁⲩⲱ̣ <text:line-break/><text:span text:style-name="T1"> </text:span><text:span text:style-name="T2">(28/13) </text:span> [ⲁⲥⲓ] ⲉⲥϣⲁϫⲉ ϩⲛ̅ ⲛ̅ϣⲁϫⲉ ⲙ̅‐ <text:line-break/><text:span text:style-name="T1"> </text:span><text:span text:style-name="T2">(28/14) </text:span> [ⲡⲱⲛ]ϩ̅· ⲁⲩⲱ ⲁ〈ⲥ〉ϭⲱ ⲙ̅ⲡⲉⲙ‐ <text:line-break/><text:span text:style-name="T1"> </text:span><text:span text:style-name="T2">(28/15) </text:span> [ⲧⲟ ⲉⲃ]ⲟⲗ ⲙ̅ⲡⲉⲧ’ϫⲟⲥⲉ ⲉⲥⲁ[ⲙⲁ]‐ <text:line-break/><text:span text:style-name="T1"> </text:span><text:span text:style-name="T2">(28/16) </text:span> [ϩⲧⲉ ⲙ̅ⲡ]ⲉⲛⲧⲁⲥ̣ϫ̣ⲓ̣ⲧϥ̅ ϩⲁⲑⲏ [ⲙ̅ⲫⲟ]‐ <text:line-break/><text:span text:style-name="T1"> </text:span><text:span text:style-name="T2">(28/17) </text:span> [ⲟⲩ ⲛ̅ⲧ]ⲁⲡⲕⲟⲥⲙⲟⲥ ϣⲱⲡⲉ <text:line-break/><text:span text:style-name="T1"> </text:span><text:span text:style-name="T2">(28/18) </text:span> [ⲟⲩ]ⲛ̣̅ⲧⲁⲥ ⲙ̅ⲙⲁⲩ ⲙ̅ⲡⲛⲟ[ϭ ⲛ̅]‐ <text:line-break/><text:span text:style-name="T1"> </text:span><text:span text:style-name="T2">(28/19) </text:span> [ⲛⲟ]ⲩⲥ ⲛ̅ⲧⲉ [ⲡ]ⲁϩⲟⲣⲁ[ⲧ]ⲟⲥ ⲁ[ⲩⲱ] <text:line-break/><text:span text:style-name="T1"> </text:span><text:span text:style-name="T2">(28/20) </text:span> [ⲥϯ ⲉ]ⲟⲟⲩ ⲙ̅ⲡ〈ⲉⲥ〉ⲉ̣[ⲓ]ⲱⲧ’ ⲁ[ⲩⲱ] <text:line-break/><text:span text:style-name="T1"> </text:span><text:span text:style-name="T2">(28/21) </text:span> [ⲉⲥ]ϣⲟⲟⲡ’ ⲛ̅ϩⲣⲁⲓ̈ ϩ̣ⲛ̅ ⲛⲉⲧ.[ <text:line-break/><text:span text:style-name="T1"> </text:span><text:span text:style-name="T2">(28/22) </text:span> [...]. ⲛ̅ϩⲣⲁⲓ̈ ϩ[ⲙ̅] ⲡ’ⲡⲗⲏⲣⲱⲙⲁ <text:line-break/><text:span text:style-name="T1"> </text:span><text:span text:style-name="T2">(28/23) </text:span> [ⲁⲩⲱ ⲛ̅]ⲥⲛⲁⲩ ⲁⲡ’̣ⲡⲗⲏⲣⲱⲙⲁ· <text:line-break/><text:span text:style-name="T1"> </text:span><text:span text:style-name="T2">(28/24) </text:span> [ⲟⲩⲛ̅ ϩ]ⲉⲛϩⲟⲟⲩ ⲛⲁϣⲱⲡⲉ ⲛ̅ⲥ‐ <text:line-break/><text:span text:style-name="T1"> </text:span><text:span text:style-name="T2">(28/25) </text:span> [ⲛⲁⲩ ⲁ]ⲡ’ⲡⲗⲏⲣⲱⲙⲁ· ⲁⲩⲱ <text:line-break/><text:span text:style-name="T1"> </text:span><text:span text:style-name="T2">(28/26) </text:span> ⲛ̅ⲥⲁϣⲱⲡⲉ ⲁⲛ ϩⲙ̅ ⲡϣⲧⲁ· <text:line-break/><text:span text:style-name="T1"> </text:span><text:span text:style-name="T2">(28/27) </text:span> ⲟⲩⲛ̅ⲧⲁⲥ ⲇⲉ ⲙ̅ⲙⲁⲩ ⲙ̅ⲡϥ̅ⲧⲁⲩ <text:line-break/><text:span text:style-name="T1"> </text:span><text:span text:style-name="T2">(28/28) </text:span> ⲛ̅ⲃⲟⲏⲑⲟⲥ ⲉⲧⲟⲩⲁⲁⲃ̓ ⲉⲩⲣ̅ⲡⲣⲉ <text:line-break/><text:span text:style-name="T1"> </text:span><text:span text:style-name="T2">(28/29) </text:span> ⲥⲃ̣ⲉⲩⲉ ϩⲁⲣⲟⲥ ϩⲁⲧⲙ̅ ⲡⲓⲱⲧ’ ⲙ̅‐ <text:line-break/><text:span text:style-name="T1"> </text:span><text:span text:style-name="T2">(28/30) </text:span> ⲡ̣[ⲧ]ⲏⲣϥ̅· ⲁ̅ⲇ̅ⲁ̅ⲙ̅ⲁ̅ ⲡⲁⲓ̈ ⲡⲉ <text:line-break/><text:soft-page-break/><text:span text:style-name="T1"> </text:span><text:span text:style-name="T2">(29/1) </text:span> ⲉⲧⲙ̅ⲡⲥⲁⲛϩⲟⲩⲛ ⲛ̅ⲛ̅ⲁⲇⲁⲙⲁⲥ <text:line-break/><text:span text:style-name="T1"> </text:span><text:span text:style-name="T2">(29/2) </text:span> ⲧⲏⲣⲟⲩ· ⲉⲩⲛ̅ⲧⲁ〈ⲩ〉 ⲙ̅ⲙⲁⲩ ⲛ̅‐ <text:line-break/><text:span text:style-name="T1"> </text:span><text:span text:style-name="T2">(29/3) </text:span> ⲧⲛⲟⲏⲥⲓⲥ ⲛ̅ⲛⲟⲣⲉⲁ· ⲉⲥϣⲁϫⲉ <text:line-break/><text:span text:style-name="T1"> </text:span><text:span text:style-name="T2">(29/4) </text:span> ⲉⲧⲃⲉ ⲡⲣⲁⲛ ⲥⲛⲁⲩ ⲉⲩⲣ̅ ϩⲱⲃ <text:line-break/><text:span text:style-name="T1"> </text:span><text:span text:style-name="T2">(29/5) </text:span> ⲁⲟⲩⲣⲁⲛ ⲛ̅ⲟⲩⲱⲧ’· </text:p>
      <text:p text:style-name="P1"/>
      <text:p text:style-name="P4">( codex IX ) The Testimony of Truth</text:p>
      <text:p text:style-name="P5"><text:span text:style-name="T1"> </text:span><text:span text:style-name="T2">(29/6) </text:span> ⲁⲛⲟⲕ’ ⲇⲉ ϯⲛⲁϫⲟⲟⲥ ⲛ̅ⲛⲉⲧ’ⲥⲟ‐ <text:line-break/><text:span text:style-name="T1"> </text:span><text:span text:style-name="T2">(29/7) </text:span> ⲟ[ⲩ]ⲛ ⲉⲥⲱⲧⲙ̅ ϩⲛ̅ ⲙ̅ⲙⲁⲁϫ̣[ⲉ] ⲁⲛ <text:line-break/><text:span text:style-name="T1"> </text:span><text:span text:style-name="T2">(29/8) </text:span> ⲙ̅ⲡⲥⲱⲙⲁ· ⲁⲗⲗⲁ ϩⲛ̅ ⲙ̅ⲙ̣[ⲁ]ⲁϫⲉ <text:line-break/><text:span text:style-name="T1"> </text:span><text:span text:style-name="T2">(29/9) </text:span> ⲙ̅ⲫⲏⲧ’· ⲁϩⲁϩ ⲅⲁⲣ ϣⲓⲛ̣[ⲉ ⲛ̅]‐ <text:line-break/><text:span text:style-name="T1"> </text:span><text:span text:style-name="T2">(29/10) </text:span> ⲥⲁ ⲧⲁⲗⲏⲑⲓⲁ· ⲁⲩⲱ ⲙ̅ⲡⲟⲩ‐ <text:line-break/><text:span text:style-name="T1"> </text:span><text:span text:style-name="T2">(29/11) </text:span> ϣϭⲙ̅ϭⲁⲙ ⲛ̅ϭⲛ̅ⲧⲥ̅· ⲉⲧⲃ[ⲉ ϫⲉ] <text:line-break/><text:span text:style-name="T1"> </text:span><text:span text:style-name="T2">(29/12) </text:span> ⲁϥⲉⲙⲁϩⲧⲉ ⲉϫⲱ[ⲟ]ⲩ ⲛ̅ϭⲓ̣ [ⲡⲉ]‐ <text:line-break/><text:span text:style-name="T1"> </text:span><text:span text:style-name="T2">(29/13) </text:span> ⲑⲁⲃ ⲛ̅ⲁⲥ ⲛ̅ⲛⲉⲫⲁ̣ⲣⲓⲥⲁ̣[ⲓⲟⲥ] <text:line-break/><text:span text:style-name="T1"> </text:span><text:span text:style-name="T2">(29/14) </text:span> ⲙⲛ̅ ⲛⲉⲅⲣⲁⲙⲙⲁⲧⲉⲱ̣[ⲥ ⲙ̅]‐ <text:line-break/><text:span text:style-name="T1"> </text:span><text:span text:style-name="T2">(29/15) </text:span> ⲡⲛⲟⲙⲟⲥ· ⲡⲑⲁⲃ ⲇⲉ ⲡ[ⲉ ⲧⲉ]‐ <text:line-break/><text:span text:style-name="T1"> </text:span><text:span text:style-name="T2">(29/16) </text:span> ⲡⲓ̣ⲑⲩⲙⲓⲁ ⲛ̅ⲡ̣ⲗⲁⲛⲏ ⲛ̅ⲧ[ⲉ] <text:line-break/><text:span text:style-name="T1"> </text:span><text:span text:style-name="T2">(29/17) </text:span> ⲛ̅ⲁ̣ⲅ’ⲅⲉⲗⲟⲥ ⲙ̣[ⲛ̅] ⲛ̣̅ⲇ̣ⲁⲓⲙⲱ̣[ⲛ] <text:line-break/><text:span text:style-name="T1"> </text:span><text:span text:style-name="T2">(29/18) </text:span> ⲙⲛ̅ ⲛ̅ⲥⲓⲟⲩ· ⲙ̣̅ⲫ[ⲁⲣ]ⲓⲥ{ⲥ}[ⲁⲓⲟⲥ] <text:line-break/><text:span text:style-name="T1"> </text:span><text:span text:style-name="T2">(29/19) </text:span> ⲇⲉ ⲙⲛ̅ ⲛ̅ⲅⲣⲁⲙⲙⲁ[ⲧⲉ]ⲱⲥ ⲛ̣[ⲁⲓ̈] <text:line-break/><text:span text:style-name="T1"> </text:span><text:span text:style-name="T2">(29/20) </text:span> ⲛⲉ ⲉⲧⲏⲡ’ ⲉ̣ⲛ̣ⲁⲣⲭⲱⲛ ⲉ̣[ⲩⲛ̅]‐ <text:line-break/><text:span text:style-name="T1"> </text:span><text:span text:style-name="T2">(29/21) </text:span> ⲧⲁⲩ ⲉⲝⲟⲩⲥⲓⲁ ⲙ̅ⲙⲁⲩ [ⲛⲁⲩ·] <text:line-break/><text:span text:style-name="T1"> </text:span><text:span text:style-name="T2">(29/22) </text:span> ⲙⲛ̅ⲗⲁⲁⲩ ⲅⲁⲣ ⲉϥϣⲟⲟ[ⲡ] ϩⲁ <text:line-break/><text:span text:style-name="T1"> </text:span><text:span text:style-name="T2">(29/23) </text:span> ⲡⲛⲟⲙⲟⲥ ⲉϥⲛⲁϣϥⲓ ⲉⲓⲁⲧϥ̅ <text:line-break/><text:span text:style-name="T1"> </text:span><text:span text:style-name="T2">(29/24) </text:span> ⲉϩⲣⲁⲓ̈ ⲉⲧⲙⲉ· ⲛ̅ⲥⲉⲛⲁϣϭⲙ̅‐ <text:line-break/><text:span text:style-name="T1"> </text:span><text:span text:style-name="T2">(29/25) </text:span> ϭⲟⲙ ⲅⲁⲣ ⲁⲛ ⲉⲣ̅ ϩⲙ̅ϩⲁⲗ ⲛ̅ϫⲟⲉⲓⲥ <text:line-break/><text:span text:style-name="T1"> </text:span><text:span text:style-name="T2">(29/26) </text:span> ⲥⲛⲁⲩ· ⲡϫⲱϩⲙ̅ ⲅⲁⲣ ⲙ̅ⲡⲛⲟ̣‐ <text:line-break/><text:span text:style-name="T1"> </text:span><text:span text:style-name="T2">(29/27) </text:span> ⲙⲟⲥ ϥⲟⲩⲟⲛϩ̅ ⲉⲃⲟⲗ· ⲧⲙⲛ̅ⲧ’ <text:line-break/><text:span text:style-name="T1"> </text:span><text:span text:style-name="T2">(30/1) </text:span> ⲁⲧ’ϫⲱϩⲙ̅ ⲇⲉ ⲉⲥⲏⲡ’ ⲉⲡⲟⲩ‐ <text:line-break/><text:span text:style-name="T1"> </text:span><text:span text:style-name="T2">(30/2) </text:span> ⲟⲉⲓⲛ· ⲡⲛⲟⲙⲟⲥ ⲙⲉⲛ ⲣ̅ⲕⲉ‐ <text:line-break/><text:span text:style-name="T1"> </text:span><text:span text:style-name="T2">(30/3) </text:span> ⲗⲉⲩⲉ ⲁϫⲓ ϩⲁⲓ̈ ⲁϫⲓ ϩⲓ̅ⲙⲉ· ⲁⲩⲱ <text:line-break/><text:span text:style-name="T1"> </text:span><text:span text:style-name="T2">(30/4) </text:span> ⲁϫⲡⲟ ⲁⲁϣⲁⲉⲓ ⲛ̅ⲑⲉ ⲙ̅ⲡϣⲱ <text:line-break/><text:span text:style-name="T1"> </text:span><text:span text:style-name="T2">(30/5) </text:span> ⲛ̅ⲑⲁⲗⲁⲁⲥⲁ· ⲡ̅’ⲡⲁⲑⲟⲥ ⲇⲉ ⲉⲧ’‐ <text:line-break/><text:span text:style-name="T1"> </text:span><text:span text:style-name="T2">(30/6) </text:span> ϩⲁⲗⲉϭ ⲛ̅ⲧⲟⲟⲧⲟⲩ· ϥⲣ̅ⲕⲁⲧⲉⲭⲉ <text:line-break/><text:span text:style-name="T1"> </text:span><text:span text:style-name="T2">(30/7) </text:span> ⲛ̅ⲛⲉⲯⲩⲭⲟⲟⲩⲉ ⲛ̅ⲛⲉⲧⲟⲩϫⲡⲟ <text:line-break/><text:span text:style-name="T1"> </text:span><text:span text:style-name="T2">(30/8) </text:span> ⲙ̅ⲙⲟⲟⲩ ⲙ̅ⲡⲉⲓ̈ⲙⲁ· ⲛⲉⲧ’ϫⲱ‐ <text:line-break/><text:span text:style-name="T1"> </text:span><text:span text:style-name="T2">(30/9) </text:span> ϩⲙ̅ ⲙⲛ̅ ⲛⲉⲧⲟⲩϫⲱϩⲙ̅ ⲙ̅ⲙⲟⲟⲩ· <text:line-break/><text:span text:style-name="T1"> </text:span><text:span text:style-name="T2">(30/10) </text:span> ϫⲉⲕⲁⲁⲥ ⲉⲣⲉⲡⲛⲟⲙⲟⲥ ⲛⲁⲟⲩ <text:line-break/><text:span text:style-name="T1"> </text:span><text:span text:style-name="T2">(30/11) </text:span> ϫⲁⲉⲓ ⲉⲃⲟⲗ ϩⲓ̅ⲧⲟⲟⲧⲟⲩ· ⲁⲩⲱ̣ <text:line-break/><text:span text:style-name="T1"> </text:span><text:span text:style-name="T2">(30/12) </text:span> ⲥⲉ[ⲟⲩ]ⲟⲛϩ̅ ⲉⲃⲟⲗ ϫⲉ ⲉⲩⲣ̅ⲃ̣ⲟⲏ‐ <text:line-break/><text:span text:style-name="T1"> </text:span><text:span text:style-name="T2">(30/13) </text:span> ⲑⲉ̣[ⲓ] ⲙ̣̅ⲡⲕⲟⲥⲙⲟⲥ· ⲁⲩⲱ ⲥ̣ⲉ‐ <text:line-break/><text:span text:style-name="T1"> </text:span><text:span text:style-name="T2">(30/14) </text:span> [ⲕⲧⲟ] ⲙ̅ⲙⲟⲟⲩ ⲉⲃⲟⲗ ⲙ̅ⲡⲟⲩⲟ‐ <text:line-break/><text:span text:style-name="T1"> </text:span><text:span text:style-name="T2">(30/15) </text:span> [ⲉⲓⲛ]· ⲛⲁⲓ̈ ⲉⲙⲛ̅ϭⲟⲙ ⲙ̅ⲙⲟⲟⲩ <text:line-break/><text:span text:style-name="T1"> </text:span><text:span text:style-name="T2">(30/16) </text:span> [ⲉⲣ̅ⲡⲁⲣ]ⲁⲅⲉ ⲙ̅ⲡⲁⲣⲭⲱⲛ ⲙ̅ⲡⲕⲁ‐ <text:line-break/><text:span text:style-name="T1"> </text:span><text:span text:style-name="T2">(30/17) </text:span> [ⲕⲉ ϣ]ⲁⲛⲧⲟⲩϯ ⲙ̅ⲡϩⲁⲉ ⲛ̅ⲕⲟⲛ‐ <text:line-break/><text:span text:style-name="T1"> </text:span><text:span text:style-name="T2">(30/18) </text:span> [ⲇⲣⲁⲛ]ⲧⲏ̣ⲥ· ⲡ̣ϣⲏⲣⲉ ⲇⲉ ⲙ̅ⲡⲣⲱ̣[ⲙⲉ] <text:line-break/><text:span text:style-name="T1"> </text:span><text:span text:style-name="T2">(30/19) </text:span> [ⲁϥ{ⲉ̅ⲓ} ⲉⲃ]ⲟ̣ⲗ ϩⲛ̣̅ ⲧ̣ⲙ̣ⲛ̅ⲧ’ⲁⲧ’ⲧⲉⲕⲟ̣ <text:line-break/><text:span text:style-name="T1"> </text:span><text:span text:style-name="T2">(30/20) </text:span> [ⲉϥⲟ ⲛ̅]ϣⲙ̅ⲙⲟ ⲉⲡϫⲱϩⲙ̅· ⲁϥ{ⲉ̅ⲓ} <text:line-break/><text:span text:style-name="T1"> </text:span><text:span text:style-name="T2">(30/21) </text:span> [ⲉⲡ]ⲕ̣ⲟⲥⲙⲟⲥ [ⲉ]ϫⲙ̅ ⲡⲓⲟⲣⲇⲁ̣ⲛⲏⲥ <text:line-break/><text:span text:style-name="T1"> </text:span><text:span text:style-name="T2">(30/22) </text:span> [ⲡⲓⲉ]ⲣⲟ· ⲁⲩⲱ̣ [ⲛ̅]ⲧⲉⲩⲛⲟⲩ ⲁ[ⲡ]ⲓ̣ⲟ̣ⲣ̣‐ <text:line-break/><text:span text:style-name="T1"> </text:span><text:span text:style-name="T2">(30/23) </text:span> [ⲇⲁ]ⲛⲏⲥ [ⲕⲟⲧϥ̅] ⲉⲡⲁϩⲟⲩ· ⲓ̣̈ⲱ‐ <text:line-break/><text:span text:style-name="T1"> </text:span><text:span text:style-name="T2">(30/24) </text:span> [ϩⲁ]ⲛ̣ⲛⲏ[ⲥ ⲇⲉ] ⲁϥⲣ̅ ⲙⲛ̅ⲧⲣⲉ ϩⲁ ⲧ’‐ <text:line-break/><text:span text:style-name="T1"> </text:span><text:span text:style-name="T2">(30/25) </text:span> [ⲕⲁⲧ]ⲁ̣ⲃⲁ[ⲥⲓ]ⲥ̣ ⲛ̅ⲓ̅ⲥ̅· ⲛ̅ⲧⲟϥ ⲅⲁⲣ <text:line-break/><text:soft-page-break/><text:span text:style-name="T1"> </text:span><text:span text:style-name="T2">(30/26) </text:span> [ⲟⲩⲁ]ⲁϥ ⲡⲉⲛⲧⲁ[ϥⲛ]ⲁⲩ ⲉⲧ’ⲇⲩ‐ <text:line-break/><text:span text:style-name="T1"> </text:span><text:span text:style-name="T2">(30/27) </text:span> [ⲛⲁⲙⲓⲥ] ⲉⲛⲧⲁⲥ{ⲉ̅ⲓ} ⲉⲡⲓⲧⲛ ⲉϫⲙ̅ <text:line-break/><text:span text:style-name="T1"> </text:span><text:span text:style-name="T2">(30/28) </text:span> ⲡⲓⲟⲣⲇ̣[ⲁ]ⲛⲏⲥ ⲡⲓⲉⲣⲟ· ⲁϥⲙ̅ⲙⲉ ⲅⲁⲣ <text:line-break/><text:span text:style-name="T1"> </text:span><text:span text:style-name="T2">(30/29) </text:span> ϫⲉ ⲁⲥϫⲱⲕ ⲉⲃⲟⲗ ⲛ̅ϭⲓ ⲧⲙⲛ̅ⲧⲉⲣⲟ‐ <text:line-break/><text:span text:style-name="T1"> </text:span><text:span text:style-name="T2">(30/30) </text:span> ⲙ̅ⲡϫⲡⲟ ⲛ̅ⲥⲁⲣⲁⲝ· ⲡⲓⲟⲣⲇⲁⲛⲏⲥ <text:line-break/><text:span text:style-name="T1"> </text:span><text:span text:style-name="T2">(30/31) </text:span> ⲇⲉ ⲡⲓⲉⲣⲟ ⲛ̅ⲧⲟϥ ⲡⲉ ⲧ’ⲇⲩⲛⲁⲙⲓⲥ <text:line-break/><text:span text:style-name="T1"> </text:span><text:span text:style-name="T2">(30/32) </text:span> ⲙ̅ⲡⲥⲱⲙⲁ ⲉⲧⲉ ⲛⲁⲓ̈ ⲛⲉ ⲛ̅ⲁⲓⲥⲑⲏ‐ <text:line-break/><text:span text:style-name="T1"> </text:span><text:span text:style-name="T2">(31/1) </text:span> ⲥⲓⲥ ⲛ̅ⲛ̅ϩⲏⲇⲟⲛⲏ· ⲡⲙⲟⲟⲩ ⲇⲉ <text:line-break/><text:span text:style-name="T1"> </text:span><text:span text:style-name="T2">(31/2) </text:span> ⲙ̅ⲡⲓⲟⲣⲇⲁⲛⲏⲥ ⲛ̅ⲧⲟϥ ⲡⲉ ⲧⲉⲡⲓ‐ <text:line-break/><text:span text:style-name="T1"> </text:span><text:span text:style-name="T2">(31/3) </text:span> ⲑⲩⲙⲓⲁ ⲛ̅ⲧⲥⲩⲛⲟⲩⲥⲓⲁ· ⲓ̈ⲱϩⲁⲛ‐ <text:line-break/><text:span text:style-name="T1"> </text:span><text:span text:style-name="T2">(31/4) </text:span> ⲛⲏⲥ ⲇⲉ ⲛ̅ⲧⲟϥ ⲡⲉ ⲡⲁⲣⲭⲱⲛ ⲛ̅‐ <text:line-break/><text:span text:style-name="T1"> </text:span><text:span text:style-name="T2">(31/5) </text:span> ⲧⲁⲧⲉ· ⲡⲁⲓ̈ ⲇⲉ ⲡⲉⲧϥ̅ⲟⲩⲱⲛϩ̅ <text:line-break/><text:span text:style-name="T1"> </text:span><text:span text:style-name="T2">(31/6) </text:span> ⲙ̅ⲙⲟϥ ⲛⲁⲛ ⲉⲃⲟⲗ ⲛ̅ϭⲓ ⲡϣⲏⲣⲉ <text:line-break/><text:span text:style-name="T1"> </text:span><text:span text:style-name="T2">(31/7) </text:span> ⲙ̅ⲡⲣⲱⲙⲉ· ϫⲉ ϣ̅ϣⲉ ⲉⲣⲱⲧⲛ̅ <text:line-break/><text:span text:style-name="T1"> </text:span><text:span text:style-name="T2">(31/8) </text:span> ⲉϫⲓ ⲙ̅ⲡⲗⲟⲅⲟⲥ ⲛ̅ⲧⲙⲉ· ⲉϣϫⲉ <text:line-break/><text:span text:style-name="T1"> </text:span><text:span text:style-name="T2">(31/9) </text:span> ⲟⲩⲛ̅ ⲟⲩⲁ ⲛⲁϫⲓⲧϥ̅ ϩⲛ̅ ⲟⲩⲙⲛ̅ⲧ’‐ <text:line-break/><text:span text:style-name="T1"> </text:span><text:span text:style-name="T2">(31/10) </text:span> ⲧⲉⲗⲉⲓⲟⲥ· ⲟⲩⲁ ⲇⲉ ⲉϥ[ϩⲛ̅]ⲧⲙⲛ̅ⲧ’‐ <text:line-break/><text:span text:style-name="T1"> </text:span><text:span text:style-name="T2">(31/11) </text:span> ⲁⲧ’̣ⲥⲟⲟⲩⲛ ⲥⲙⲟⲕϩ̅ ⲛⲁϥ̣ [ⲉ]ⲧ̣ⲣ̣ⲉ[ϥ]‐ <text:line-break/><text:span text:style-name="T1"> </text:span><text:span text:style-name="T2">(31/12) </text:span> ϭⲱϫⲃ̅ ⲛ̅ⲛⲉϥϩⲃⲏⲟⲩⲉ ⲛ̅ⲕ̣[ⲁⲕⲉ] <text:line-break/><text:span text:style-name="T1"> </text:span><text:span text:style-name="T2">(31/13) </text:span> ⲛⲁⲓ̈ ⲛ̅ⲧⲁϥⲁⲁⲩ· ⲛⲉⲧⲁϩⲥ̣[ⲟⲩ]‐ <text:line-break/><text:span text:style-name="T1"> </text:span><text:span text:style-name="T2">(31/14) </text:span> ⲱⲛ ⲧⲙⲛ̅ⲧ’ⲁⲧ’ⲧⲉⲕⲟ ⲇ[ⲉ ⲛ̅]‐ <text:line-break/><text:span text:style-name="T1"> </text:span><text:span text:style-name="T2">(31/15) </text:span> ⲧⲁⲩϣ̣ϯ ⲉ̣ϩ̣[ⲛ̅ ϩⲉⲛ]ⲡ̣[ⲁⲑⲟⲥ] <text:line-break/><text:span text:style-name="T1"> </text:span><text:span text:style-name="T2">(31/16) </text:span> (1 line missing) <text:line-break/><text:span text:style-name="T1"> </text:span><text:span text:style-name="T2">(31/17) </text:span> [ 10+- ] ⲁⲓ̈ϫ[ⲟⲟⲥ ⲛⲏ]‐ <text:line-break/><text:span text:style-name="T1"> </text:span><text:span text:style-name="T2">(31/18) </text:span> [ⲧⲛ̅] ϫ̣ⲉ̣ ⲙ̅ⲡ[ⲣ̅]ⲕⲱⲧ’· ⲟⲩ[ⲧⲉ ⲙ̅]‐ <text:line-break/><text:span text:style-name="T1"> </text:span><text:span text:style-name="T2">(31/19) </text:span> [ⲡ̣ⲣ̅]ⲥ̣ⲱⲟⲩϩ̣ [ⲛ]ⲏ̣ⲧⲛ̅ ⲙ̅ⲡⲙ̣[ⲁ] <text:line-break/><text:span text:style-name="T1"> </text:span><text:span text:style-name="T2">(31/20) </text:span> ⲉ̣ⲧⲉ ⲛ̅ⲗⲏⲥⲧⲏⲥ ϣⲟϫⲧ̅’ ⲉ̣[ⲣⲟϥ·] <text:line-break/><text:span text:style-name="T1"> </text:span><text:span text:style-name="T2">(31/21) </text:span> ⲁⲗⲗⲁ ϯ ⲕⲁⲣⲡⲟⲥ ⲉⲡⲥⲁⲛ̣[ⲧⲡⲉ] <text:line-break/><text:span text:style-name="T1"> </text:span><text:span text:style-name="T2">(31/22) </text:span> ϣⲁ ⲡⲓⲱⲧ’· ⲉⲩⲙⲉⲉⲩ[ⲉ ϩⲙ̅] <text:line-break/><text:span text:style-name="T1"> </text:span><text:span text:style-name="T2">(31/23) </text:span> ⲡⲉⲩϩⲏⲧ’ ⲛ̣̅ϭⲓ ⲛⲁⲑⲏⲧ̣ [ϫⲉ] <text:line-break/><text:span text:style-name="T1"> </text:span><text:span text:style-name="T2">(31/24) </text:span> ⲉⲩϣⲁⲛϩⲟⲙⲟⲗⲟⲅ̣[ⲉⲓ ϫ]ⲉ̣ ⲁⲛⲟⲛ <text:line-break/><text:span text:style-name="T1"> </text:span><text:span text:style-name="T2">(31/25) </text:span> ϩⲉⲛⲭⲣⲏⲥⲧⲓⲁⲛⲟⲥ [ϩ]ⲙ̅ ⲡϣⲁ‐ <text:line-break/><text:span text:style-name="T1"> </text:span><text:span text:style-name="T2">(31/26) </text:span> ϫⲉ ⲙ̅ⲙⲁⲧⲉ ϩⲛ̅ ⲧϭⲟⲙ ⲁⲛ ⲉⲩ‐ <text:line-break/><text:span text:style-name="T1"> </text:span><text:span text:style-name="T2">(31/27) </text:span> ϯ ⲙ̅ⲙⲟⲟⲩ ⲉϩⲣⲁⲓ̈ ⲉⲧⲙⲛ̅ⲧ’ⲁ[ⲧ’] <text:line-break/><text:span text:style-name="T1"> </text:span><text:span text:style-name="T2">(31/28) </text:span> ⲥⲟⲟⲩⲛ ⲟⲩⲁⲁⲩ ⲉϩⲣⲁⲓ̈ ⲉⲩ‐ <text:line-break/><text:span text:style-name="T1"> </text:span><text:span text:style-name="T2">(31/29) </text:span> ⲙⲟⲩ ⲙ̅ⲙⲛ̅ⲧⲣⲱⲙⲉ· ⲉⲛⲥⲉ <text:line-break/><text:span text:style-name="T1"> </text:span><text:span text:style-name="T2">(31/30) </text:span> ⲥⲟⲟⲩⲛ ⲁⲛ ϫⲉ ⲉⲩ[ⲃ]ⲏⲕ’ ⲉⲧⲱ̣[ⲛ] <text:line-break/><text:span text:style-name="T1"> </text:span><text:span text:style-name="T2">(32/1) </text:span> ⲟⲩⲇⲉ ⲛ̅ⲥⲉⲥⲟⲟⲩⲛ ⲁⲛ ⲇⲉ ⲛⲓⲙ <text:line-break/><text:span text:style-name="T1"> </text:span><text:span text:style-name="T2">(32/2) </text:span> ⲡⲉ ⲡⲉⲭ̅ⲥ̅ ⲉⲩⲙⲉⲉⲩⲉ ϫⲉ ⲥⲉ‐ <text:line-break/><text:span text:style-name="T1"> </text:span><text:span text:style-name="T2">(32/3) </text:span> ⲛⲁⲱⲛϩ̅· ϩⲟⲡⲟⲧⲉ ⲥⲉⲣ̅ⲡⲗⲁⲛⲁⲥ‐ <text:line-break/><text:span text:style-name="T1"> </text:span><text:span text:style-name="T2">(32/4) </text:span> ⲑⲁⲓ· ⲥⲉⲣ̅ⲇⲓⲱⲕⲉ ϣⲁϩⲟⲩⲛ ⲉⲛⲁⲣ‐ <text:line-break/><text:span text:style-name="T1"> </text:span><text:span text:style-name="T2">(32/5) </text:span> ⲭⲏ ⲙⲛ̅ ⲛⲉⲝⲟⲩⲥⲓⲁ· ⲥⲉϩⲉ ⲇⲉ <text:line-break/><text:span text:style-name="T1"> </text:span><text:span text:style-name="T2">(32/6) </text:span> ⲉⲧⲟⲟⲧ〈ⲟⲩ〉 ⲛ̅ⲛⲁⲓ̈ ⲉⲧⲃⲉ ⲧⲙⲛ̅ⲧ’‐ <text:line-break/><text:span text:style-name="T1"> </text:span><text:span text:style-name="T2">(32/7) </text:span> ⲁⲧ’ⲥⲟⲟⲩⲛ ⲉⲧ’ϣⲟⲟⲡ’ ϩⲣⲁⲓ̈ <text:line-break/><text:span text:style-name="T1"> </text:span><text:span text:style-name="T2">(32/8) </text:span> ⲛ̅ϩⲏⲧⲟⲩ· ⲛⲉⲩⲧⲟⲩϫⲟⲉⲓⲧ’ <text:line-break/><text:span text:style-name="T1"> </text:span><text:span text:style-name="T2">(32/9) </text:span> ⲅⲁⲣ ⲛ̅ϭⲓ ⲛ̅ϣⲁϫⲉ ⲙ̅ⲙⲉⲧⲉ ⲉⲧⲣ̅‐ <text:line-break/><text:span text:style-name="T1"> </text:span><text:span text:style-name="T2">(32/10) </text:span> ⲙⲛ̅ⲧⲣⲉ· ⲛⲉⲡⲕⲟⲥⲙⲟⲥ ⲧⲏ̣ⲣϥ̅ <text:line-break/><text:soft-page-break/><text:span text:style-name="T1"> </text:span><text:span text:style-name="T2">(32/11) </text:span> ⲡⲉ [ⲛ]ⲁ̣ⲣ̅ϩⲩⲡⲟⲙⲓⲛⲉ ⲉⲡⲉⲓ̣ϩⲱⲃ <text:line-break/><text:span text:style-name="T1"> </text:span><text:span text:style-name="T2">(32/12) </text:span> [ⲁⲩ]ⲱ̣ ⲛⲉⲩⲛⲁⲟⲩϫⲁⲉⲓ ⲡⲉ· <text:line-break/><text:span text:style-name="T1"> </text:span><text:span text:style-name="T2">(32/13) </text:span> [ⲁⲗ]ⲗ̣ⲁ ϯⲡⲗⲁⲛⲏ ⲛ̅ⲧⲉⲓ̈ϩⲉ ⲛ̅ⲧⲁⲩ <text:line-break/><text:span text:style-name="T1"> </text:span><text:span text:style-name="T2">(32/14) </text:span> [ⲥⲟⲕ]ⲥ̣̅ ⲛⲁⲩ ⲉϩⲣⲁⲓ̈ ⲟⲩⲁ̣ⲁⲩ· <text:line-break/><text:span text:style-name="T1"> </text:span><text:span text:style-name="T2">(32/15) </text:span> [ 17+- ]ⲁ̣ <text:line-break/><text:span text:style-name="T1"> </text:span><text:span text:style-name="T2">(32/16) </text:span> (1 line missing) <text:line-break/><text:span text:style-name="T1"> </text:span><text:span text:style-name="T2">(32/17) </text:span> [....].ⲟⲩ[ <text:line-break/><text:span text:style-name="T1"> </text:span><text:span text:style-name="T2">(32/18) </text:span> [ⲥⲉⲥⲟ]ⲟⲩⲛ ⲁⲛ ϫ̣ⲉ ⲉⲩⲛ̣[ⲁⲧⲉ] <text:line-break/><text:span text:style-name="T1"> </text:span><text:span text:style-name="T2">(32/19) </text:span> [ⲕⲟ]ⲟⲩ· ⲟⲩ[ⲁⲁ]ⲩ· ⲛⲉⲣⲉ ⲡ̣[ⲓ]ⲱ̣[ⲧ’] <text:line-break/><text:span text:style-name="T1"> </text:span><text:span text:style-name="T2">(32/20) </text:span> [ⲛⲁ]ⲟⲩⲉϣ ⲟⲩⲑⲩⲥⲓⲁ ⲙ̅ⲙⲛ̅‐ <text:line-break/><text:span text:style-name="T1"> </text:span><text:span text:style-name="T2">(32/21) </text:span> [ⲧ’ⲣ]ⲱ̣ⲙⲉ ⲛⲉϥⲛⲁϣⲱⲡⲉ ⲛ̅ⲕⲉ‐ <text:line-break/><text:span text:style-name="T1"> </text:span><text:span text:style-name="T2">(32/22) </text:span> [ⲛⲟⲇ]ⲟ̣ⲝⲟⲥ· ⲡ̣ϣⲏⲣⲉ ⲅⲁⲣ ⲙ̅‐ <text:line-break/><text:span text:style-name="T1"> </text:span><text:span text:style-name="T2">(32/23) </text:span> [ⲡⲣⲱ]ⲙ̣ⲉ ⲁϥϯ ϩⲓ̅ⲱⲱϥ ⲛ̅ⲛⲉⲩ‐ <text:line-break/><text:span text:style-name="T1"> </text:span><text:span text:style-name="T2">(32/24) </text:span> ⲁⲡⲁⲣ[ⲭ]ⲏ̣· ⲁϥⲃⲱⲕ ⲉⲡⲓⲧⲛ̅ ϣⲁ <text:line-break/><text:span text:style-name="T1"> </text:span><text:span text:style-name="T2">(32/25) </text:span> ⲉⲙⲛ̅ⲧⲉ ⲁⲩⲱ ⲁϥⲣ̅ ϩⲁϩ ⲛ̅ϭⲟⲙ <text:line-break/><text:span text:style-name="T1"> </text:span><text:span text:style-name="T2">(32/26) </text:span> [ⲁ]ϥⲧⲟⲩⲛⲟⲥ ⲛⲉⲧ’ⲙⲟⲟⲩⲧ’ <text:line-break/><text:span text:style-name="T1"> </text:span><text:span text:style-name="T2">(32/27) </text:span> [ϩ]ⲣⲁⲓ̈ ⲛ̅ϩⲏⲧϥ̅· ⲁⲩⲱ ⲁⲩⲕⲱϩ <text:line-break/><text:span text:style-name="T1"> </text:span><text:span text:style-name="T2">(32/28) </text:span> ⲉⲣⲟϥ ⲛ̅ϭⲓ ⲛ̅ⲕⲟⲥⲙⲟⲕⲣⲁⲧⲱⲣ <text:line-break/><text:span text:style-name="T1"> </text:span><text:span text:style-name="T2">(33/1) </text:span> ⲛ̣̅ⲧⲉ ⲡⲕⲁⲕⲉ· ϫⲉ ⲙ̅ⲡⲟⲩϭⲛ̅ <text:line-break/><text:span text:style-name="T1"> </text:span><text:span text:style-name="T2">(33/2) </text:span> ⲛⲟⲃⲉ ϩⲣⲁⲓ̈ ⲛ̅ϩⲏⲧϥ̅· ⲁⲗⲗⲁ <text:line-break/><text:span text:style-name="T1"> </text:span><text:span text:style-name="T2">(33/3) </text:span> ⲛⲉⲩⲕⲉϩⲃⲏⲟⲩⲉ ⲁϥⲃⲟⲗⲟⲩ <text:line-break/><text:span text:style-name="T1"> </text:span><text:span text:style-name="T2">(33/4) </text:span> ⲉⲃⲟⲗ ϩⲓ̅ⲧⲛ̅ ⲛ̅ⲣⲱⲙⲉ· ϩⲟⲓⲟⲛ <text:line-break/><text:span text:style-name="T1"> </text:span><text:span text:style-name="T2">(33/5) </text:span> ⲛ̅ϭⲁⲗⲉⲉⲩⲉ ⲛ̅ⲃⲗ̅ⲗⲉⲉⲩⲉ <text:line-break/><text:span text:style-name="T1"> </text:span><text:span text:style-name="T2">(33/6) </text:span> ⲛⲉⲧ’ⲥⲏϭ· ⲛⲉⲃⲟ· ⲛⲉⲧⲟ ⲛ̅‐ <text:line-break/><text:span text:style-name="T1"> </text:span><text:span text:style-name="T2">(33/7) </text:span> ⲇⲁⲓⲙⲱⲛ· ⲁϥⲣ̅ⲭⲁⲣⲓⲍⲉ ⲛⲁⲩ <text:line-break/><text:span text:style-name="T1"> </text:span><text:span text:style-name="T2">(33/8) </text:span> ⲙ̅ⲡⲧⲁⲗϭⲟ· ⲁⲩⲱ ⲁϥⲙⲟⲟϣⲉ <text:line-break/><text:span text:style-name="T1"> </text:span><text:span text:style-name="T2">(33/9) </text:span> ϩⲓϫⲛ̅ ⲙ̅ⲙⲟⲩⲉⲓⲟⲟⲩⲉ ⲛ̅ⲑ̣ⲁ‐ <text:line-break/><text:span text:style-name="T1"> </text:span><text:span text:style-name="T2">(33/10) </text:span> [ⲗ]ⲁⲥⲥⲁ· ⲉⲧⲃⲉ ⲡⲁⲓ̈ ⲁϥ[ⲧⲉ]ⲕ̣ⲟ <text:line-break/><text:span text:style-name="T1"> </text:span><text:span text:style-name="T2">(33/11) </text:span> ⲛ̣̅[ⲧⲉ]ϥⲥ̣ⲁ̣[ⲣ]ⲁ̣ⲝ ⲉⲃⲟⲗ ϩⲛ̅ [ <text:line-break/><text:span text:style-name="T1"> </text:span><text:span text:style-name="T2">(33/12) </text:span> ⲛ̅ⲧⲁϥ̣[....] ⲁⲩⲱ ⲁϥϣ[ⲱⲡⲉ] <text:line-break/><text:span text:style-name="T1"> </text:span><text:span text:style-name="T2">(33/13) </text:span> [ 7+- ]. ⲛ̅ⲟⲩϫⲁ[ⲓ̈ <text:line-break/><text:span text:style-name="T1"> </text:span><text:span text:style-name="T2">(33/14) </text:span> [....ⲡⲉ]ϥ̣ⲙⲟ̣[ⲩ] ⲡ̣[ <text:line-break/><text:span text:style-name="T1"> </text:span><text:span text:style-name="T2">(33/15) </text:span> (4 lines missing) (b) [ⲟⲩ]ⲟ̣ⲛ̣ [ⲛⲓⲙ <text:line-break/><text:span text:style-name="T1"> </text:span><text:span text:style-name="T2">(33/16) </text:span> ⲟⲩ[ⲏ]ⲣ ⲛ[ⲉ· ϩⲉⲛ ϫⲁⲩⲙⲟⲉⲓⲧ’] <text:line-break/><text:span text:style-name="T1"> </text:span><text:span text:style-name="T2">(33/17) </text:span> ⲛ̅ⲃⲗ̣̅ⲗⲉ ⲛ̣[ⲉ ⲛ̅ⲑⲉ ⲛ̅ⲙ̅ⲙⲁⲑⲏⲧⲏⲥ·] <text:line-break/><text:span text:style-name="T1"> </text:span><text:span text:style-name="T2">(33/18) </text:span> ⲁⲩⲧⲁⲗⲟ̣ [ⲉⲡϫⲟⲓ̈ ⲛⲁⲙⲁⲁⲃ ⲛ̅]‐ <text:line-break/><text:span text:style-name="T1"> </text:span><text:span text:style-name="T2">(33/19) </text:span> ⲥⲧⲁⲇⲓⲟⲛ ⲁⲩ[ⲛⲁⲩ ⲉⲓ̅ⲥ̅ ⲉϥⲙⲟ]‐ <text:line-break/><text:span text:style-name="T1"> </text:span><text:span text:style-name="T2">(33/20) </text:span> ⲟϣⲉ ϩⲓ̅ϫⲛ̅ ⲑⲁ[ⲗⲁⲥⲥⲁ· ⲛⲁⲓ̈] <text:line-break/><text:span text:style-name="T1"> </text:span><text:span text:style-name="T2">(33/21) </text:span> ⲛⲉ ⲙ̅ⲙⲁⲣⲧⲩⲣⲟ̣[ⲥ ⲉⲧ’ϣⲟⲩ] <text:line-break/><text:span text:style-name="T1"> </text:span><text:span text:style-name="T2">(33/22) </text:span> ⲉⲓⲧ’ ⲉⲩⲣ̅ ⲙⲛ̅ⲧⲣⲉ [ϩⲁⲣⲱⲟⲩ] <text:line-break/><text:span text:style-name="T1"> </text:span><text:span text:style-name="T2">(33/23) </text:span> ⲟⲩⲁⲁⲩ· ⲕⲁⲓⲧⲟ[ⲓ ϣ]ⲁ̣ⲩ̣‐ <text:line-break/><text:span text:style-name="T1"> </text:span><text:span text:style-name="T2">(33/24) </text:span> ϣⲱⲛⲉ· ⲁⲩⲱ ⲙⲁⲩϣⲧⲁⲗⲟ[ⲟⲩ] <text:line-break/><text:span text:style-name="T1"> </text:span><text:span text:style-name="T2">(34/1) </text:span> ⲟⲩⲁⲁⲩ· ϩⲟⲧⲁⲛ ⲇⲉ ⲉⲩϣⲁⲛ‐ <text:line-break/><text:span text:style-name="T1"> </text:span><text:span text:style-name="T2">(34/2) </text:span> ϫⲱⲕ’ ⲉⲃⲟⲗ ⲛ̅ⲟⲩⲡⲁⲑⲟⲥ· ⲡⲁⲓ̈ <text:line-break/><text:span text:style-name="T1"> </text:span><text:span text:style-name="T2">(34/3) </text:span> ⲡⲉ ⲡⲙⲉⲉⲩⲉ ⲉⲧⲟⲩⲕⲱ ⲙ̅ⲙⲟϥ <text:line-break/><text:span text:style-name="T1"> </text:span><text:span text:style-name="T2">(34/4) </text:span> ⲛ̅ϩⲣⲁⲓ̈ ⲛ̅ϩⲏⲧⲟⲩ· ϫⲉ ⲉⲛϣⲁⲛ‐ <text:line-break/><text:span text:style-name="T1"> </text:span><text:span text:style-name="T2">(34/5) </text:span> ⲡⲁⲣⲁⲇⲓⲇⲟⲩ ⲙ̅ⲙⲟⲛ ⲉⲡⲙⲟⲩ <text:line-break/><text:soft-page-break/><text:span text:style-name="T1"> </text:span><text:span text:style-name="T2">(34/6) </text:span> ϩⲁ ⲡⲣⲁⲛ ⲧⲛ̅ⲛⲁⲟⲩϫⲁⲉⲓ· ⲛⲁⲓ̈ <text:line-break/><text:span text:style-name="T1"> </text:span><text:span text:style-name="T2">(34/7) </text:span> ⲇⲉ ⲥⲙⲟⲛⲧ̅’ ⲁⲛ ⲛ̅ϯϩⲉ· ⲁⲗⲗⲁ <text:line-break/><text:span text:style-name="T1"> </text:span><text:span text:style-name="T2">(34/8) </text:span> ⲉⲃⲟⲗ ϩⲓ̅ⲧⲟⲟⲧⲟⲩ ⲛ̅ⲛⲁⲥⲧⲏⲣ <text:line-break/><text:span text:style-name="T1"> </text:span><text:span text:style-name="T2">(34/9) </text:span> ⲛ̅ⲣⲉϥⲡⲗⲁⲛⲁ· ⲉⲩϫⲱ ⲙ̅ⲙⲟⲥ <text:line-break/><text:span text:style-name="T1"> </text:span><text:span text:style-name="T2">(34/10) </text:span> ϫⲉ ⲁⲩϫⲱⲕ’ ⲉⲃⲟⲗ ⲙ̅ⲡⲉⲩⲡⲱ̣[ⲧ’] <text:line-break/><text:span text:style-name="T1"> </text:span><text:span text:style-name="T2">(34/11) </text:span> ⲉⲧ’[ϣ]ⲟ̣ⲩ̣ⲉⲓⲧ’· ⲁⲩⲱ ⲁ[.].[ <text:line-break/><text:span text:style-name="T1"> </text:span><text:span text:style-name="T2">(34/12) </text:span> [....]ϫ̣ⲟⲟⲥ ϫⲉ̣ [.].[.].ⲁ[..].ⲉⲩ <text:line-break/><text:span text:style-name="T1"> </text:span><text:span text:style-name="T2">(34/13) </text:span> [......] ⲛⲁⲓ̈ ⲇⲉ .[...]ⲙ̣[.]. <text:line-break/><text:span text:style-name="T1"> </text:span><text:span text:style-name="T2">(34/14) </text:span> [.....]ⲉ̣ ⲁ̣ⲩⲡⲁⲣ[ⲁⲇⲓⲇⲟⲩ ⲙ̅] <text:line-break/><text:span text:style-name="T1"> </text:span><text:span text:style-name="T2">(34/15) </text:span> [ⲙⲟⲟⲩ..]..[ <text:line-break/><text:span text:style-name="T1"> </text:span><text:span text:style-name="T2">(34/16) </text:span> (4 lines missing) <text:line-break/><text:span text:style-name="T1"> </text:span><text:span text:style-name="T2">(34/20) </text:span> [ 12+- ]ⲩ [ⲙ̅]ⲡ̣ⲉϥ <text:line-break/><text:span text:style-name="T1"> </text:span><text:span text:style-name="T2">(34/21) </text:span> [ 11+- ].ⲓⲥ[.]ⲉ ⲙⲛ̅ <text:line-break/><text:span text:style-name="T1"> </text:span><text:span text:style-name="T2">(34/22) </text:span> [ 10+- ]ⲧ̣ⲉ̣ ⲙⲛ̅ ⲧⲉϥ <text:line-break/><text:span text:style-name="T1"> </text:span><text:span text:style-name="T2">(34/23) </text:span> [ 8+- ⲥ]ⲉ̣ⲧⲟⲛⲧⲛ̅ ⲇⲉ <text:line-break/><text:span text:style-name="T1"> </text:span><text:span text:style-name="T2">(34/24) </text:span> [ 7+- ⲉ]ⲣⲟⲟⲩ· ⲙⲛ̅ⲧⲁⲩ <text:line-break/><text:span text:style-name="T1"> </text:span><text:span text:style-name="T2">(34/25) </text:span> [ⲇⲉ ⲙ̅ⲙⲁⲩ ⲙ̅]ⲡⲗⲟⲅⲟⲥ ⲉⲧ’ⲧⲛ̅ <text:line-break/><text:span text:style-name="T1"> </text:span><text:span text:style-name="T2">(34/26) </text:span> [ϩⲟ· ⲁⲩⲱ] ⲟ̣ⲩⲛ̅ ϩⲟⲉⲓⲛⲉ ϫⲱ <text:line-break/><text:span text:style-name="T1"> </text:span><text:span text:style-name="T2">(34/27) </text:span> [ⲙ̅]ⲙ̣[ⲟⲥ] ϫ̣ⲉ ϩⲙ̅ ⲫⲁⲉ ⲛ̅ϩⲟ‐ <text:line-break/><text:span text:style-name="T1"> </text:span><text:span text:style-name="T2">(34/28) </text:span> ⲟⲩ ⲧ[ⲛ̅ⲛ]ⲁⲧⲱⲱⲛ ⲕⲁⲗⲱⲥ <text:line-break/><text:span text:style-name="T1"> </text:span><text:span text:style-name="T2">(35/1) </text:span> [ϩⲛ̅ ⲧⲁⲛ]ⲁⲥⲧⲁⲥⲓⲥ· ⲛ̅ⲥⲉⲥⲟ‐ <text:line-break/><text:span text:style-name="T1"> </text:span><text:span text:style-name="T2">(35/2) </text:span> [ⲟⲩⲛ] ⲇ̣ⲉ ⲁⲛ ϫⲉ ⲉⲩϫⲱ ⲙ̅ⲙⲟⲥ <text:line-break/><text:span text:style-name="T1"> </text:span><text:span text:style-name="T2">(35/3) </text:span> [ϫⲉ ⲟⲩ·] ⲡϩⲁⲉ ⲅⲁⲣ ⲛ̅ϩⲟⲟⲩ <text:line-break/><text:span text:style-name="T1"> </text:span><text:span text:style-name="T2">(35/4) </text:span> [ⲡⲉ ϩⲟ]ⲧ̣ⲁⲛ ⲉⲣϣⲁⲛⲁⲡⲉⲭ̅ⲥ̅ <text:line-break/><text:span text:style-name="T1"> </text:span><text:span text:style-name="T2">(35/5) </text:span> [....]ⲛ̣[..] ⲙ̣̅[ⲡ]ⲕ̣ⲁϩ ⲉⲧⲉ <text:line-break/><text:span text:style-name="T1"> </text:span><text:span text:style-name="T2">(35/6) </text:span> [...].ⲁ ⲡⲉ ⲛ̣̅[ⲧ]ⲁⲣⲉⲡⲭⲣⲟ‐ <text:line-break/><text:span text:style-name="T1"> </text:span><text:span text:style-name="T2">(35/7) </text:span> [ⲛⲟⲥ ⲇ]ⲉ ϫⲱⲕ’ ⲉ[ⲃⲟ]ⲗ̓ ⲁϥⲃⲱⲗ <text:line-break/><text:span text:style-name="T1"> </text:span><text:span text:style-name="T2">(35/8) </text:span> [ⲉⲃⲟⲗ] ⲙ̣̅ⲡ̣ⲉ̣ⲩ̣ⲁ̣ⲣ̣[ⲭⲱⲛ] ⲛ̅ⲧⲉ <text:line-break/><text:span text:style-name="T1"> </text:span><text:span text:style-name="T2">(35/9) </text:span> [ⲡⲁⲕⲉ 9+- ]ⲯⲩⲭⲏ <text:line-break/><text:span text:style-name="T1"> </text:span><text:span text:style-name="T2">(35/10) </text:span> [ 17+- ]. <text:line-break/><text:span text:style-name="T1"> </text:span><text:span text:style-name="T2">(35/11) </text:span> (9 lines missing) <text:line-break/><text:span text:style-name="T1"> </text:span><text:span text:style-name="T2">(35/20) </text:span> ⲉⲙ̣[ 10+- ⲁϥⲱϩⲉ]‐ <text:line-break/><text:span text:style-name="T1"> </text:span><text:span text:style-name="T2">(35/21) </text:span> ⲉⲣⲁⲧ̣ϥ̣̅ [ <text:line-break/><text:span text:style-name="T1"> </text:span><text:span text:style-name="T2">(35/22) </text:span> ⲁⲩϣⲓⲛⲉ [ϫⲉ ⲁϣ ⲡⲉⲛⲧⲁⲩ]‐ <text:line-break/><text:span text:style-name="T1"> </text:span><text:span text:style-name="T2">(35/23) </text:span> ⲙⲟⲣⲟⲩ ⲙ̅ⲙⲟ̣[ϥ ⲁⲩⲱ ⲁϣ ⲧⲉ] <text:line-break/><text:span text:style-name="T1"> </text:span><text:span text:style-name="T2">(35/24) </text:span> ⲑⲉ ⲉϣϣⲉ ⲉⲃ[ⲟⲗⲟⲩ ⲟⲩⲁⲁⲩ] <text:line-break/><text:span text:style-name="T1"> </text:span><text:span text:style-name="T2">(35/25) </text:span> ⲉⲃⲟⲗ· ⲁⲩⲱ ⲛ̅[ⲧⲁⲩⲥⲟⲩⲱ] <text:line-break/><text:span text:style-name="T1"> </text:span><text:span text:style-name="T2">(35/26) </text:span> ⲛⲟⲩ ⲟⲩⲁⲁⲩ ϫⲉ [ⲛⲓⲙ ⲛⲉ·] <text:line-break/><text:span text:style-name="T1"> </text:span><text:span text:style-name="T2">(35/27) </text:span> ⲏ ⲉⲩⲧⲱⲛ ⲛ̅ⲧⲟϥ ⲙ̣̅[ⲡⲓⲛⲁⲩ] <text:line-break/><text:span text:style-name="T1"> </text:span><text:span text:style-name="T2">(35/28) </text:span> ⲁⲩⲱ ϫⲉ ⲁϣ ⲡⲉ ⲡ[ⲧⲟⲡⲟⲥ] <text:line-break/><text:span text:style-name="T1"> </text:span><text:span text:style-name="T2">(36/1) </text:span> ⲉⲧⲟⲩⲛⲁⲙ̅ⲧⲟⲛ ⲙ̅ⲙⲟ[ⲟⲩ ⲛ̅ϩⲏⲧϥ̅] <text:line-break/><text:span text:style-name="T1"> </text:span><text:span text:style-name="T2">(36/2) </text:span> ϩ̣ⲛ̅ ⲧ̣ⲟⲩⲙⲛ̅ⲧ’ⲁⲧ’ϩⲏⲧ’ [ⲉⲩⲡⲱϩ] <text:line-break/><text:span text:style-name="T1"> </text:span><text:span text:style-name="T2">(36/3) </text:span> ⲉϩⲣⲁⲓ̈ ⲉϫⲛ̅ ⲧⲅⲛⲱⲥⲓⲥ· ⲛ̣[ⲁⲓ̈ ⲇⲉ] <text:line-break/><text:span text:style-name="T1"> </text:span><text:span text:style-name="T2">(36/4) </text:span> ⲡⲉⲭ̅ⲥ̅ ⲛⲁⲡⲟⲟⲛⲟⲩ ⲉϩⲣ̣[ⲁⲓ̈ ⲉⲛⲉⲧ’] <text:line-break/><text:span text:style-name="T1"> </text:span><text:span text:style-name="T2">(36/5) </text:span> ϫⲟⲥⲉ· ϩⲱⲥ ⲉⲁⲩ[ⲕ]ⲱ̣ [ⲛ̅ⲥⲱⲟⲩ] <text:line-break/><text:span text:style-name="T1"> </text:span><text:span text:style-name="T2">(36/6) </text:span> ⲛ̅ⲧⲙⲛ̅ⲧ’ⲁ[ⲧ’ϩⲏⲧ’ ⲉ]ⲩϯ [ⲙ̅ⲡⲉⲩ] <text:line-break/><text:span text:style-name="T1"> </text:span><text:span text:style-name="T2">(36/7) </text:span> ⲟⲩⲟⲉⲓ ⲉϩ[ⲣⲁⲉ]ⲓ ⲉⲧⲅⲛⲱ̣[ⲥⲓⲥ·] <text:line-break/><text:soft-page-break/><text:span text:style-name="T1"> </text:span><text:span text:style-name="T2">(36/8) </text:span> ⲛⲉⲧⲉ ⲟⲩ[ⲛ̅ⲧⲁ]ⲩ ⲇⲉ ⲙ̅[ⲙⲁⲩ] <text:line-break/><text:span text:style-name="T1"> </text:span><text:span text:style-name="T2">(36/9) </text:span> ⲛ̅ⲧⲅⲛ[ⲱⲥⲓⲥ <text:line-break/><text:span text:style-name="T1"> </text:span><text:span text:style-name="T2">(36/10) </text:span> ⲙⲟⲥ[ <text:line-break/><text:span text:style-name="T1"> </text:span><text:span text:style-name="T2">(36/11) </text:span> ⲉ[ <text:line-break/><text:span text:style-name="T1"> </text:span><text:span text:style-name="T2">(36/12) </text:span> (9 lines missing) <text:line-break/><text:span text:style-name="T1"> </text:span><text:span text:style-name="T2">(36/21) </text:span> [ 15+- ]ⲡ̣ⲛⲟϭ <text:line-break/><text:span text:style-name="T1"> </text:span><text:span text:style-name="T2">(36/22) </text:span> [ 8+- ⲧⲁⲛⲁⲥⲧ]ⲁ̣ⲥ̣ⲓⲥ <text:line-break/><text:span text:style-name="T1"> </text:span><text:span text:style-name="T2">(36/23) </text:span> [ 9+- ⲁϥ]ⲥⲟⲩⲱⲛ <text:line-break/><text:span text:style-name="T1"> </text:span><text:span text:style-name="T2">(36/24) </text:span> [ⲡϣⲏⲣⲉ ⲙ̅ⲡⲣⲱ]ⲙⲉ· ⲉⲧⲉ <text:line-break/><text:span text:style-name="T1"> </text:span><text:span text:style-name="T2">(36/25) </text:span> [ⲡⲁⲓ̈ ⲡⲉ ⲛ̅ⲧⲁϥⲥ]ⲟⲩⲱⲛϥ̅ ⲟⲩ‐ <text:line-break/><text:span text:style-name="T1"> </text:span><text:span text:style-name="T2">(36/26) </text:span> [ⲁⲁϥ· ⲡⲁⲓ̈ ⲇⲉ] ⲡ̣ⲉ ⲡⲱⲛϩ̅ ⲉⲧ’ϫⲏⲕ <text:line-break/><text:span text:style-name="T1"> </text:span><text:span text:style-name="T2">(36/27) </text:span> [ⲉⲃⲟⲗ ⲉⲧⲣⲉ]ⲡⲣⲱⲙⲉ ⲥⲟⲩⲱ‐ <text:line-break/><text:span text:style-name="T1"> </text:span><text:span text:style-name="T2">(36/28) </text:span> [ⲛϥ̅ ⲟⲩⲁⲁ]ϥ ⲉⲃⲟⲗ ϩⲓ̅ⲧⲛ̅ ⲡⲧⲏⲣϥ̅· <text:line-break/><text:span text:style-name="T1"> </text:span><text:span text:style-name="T2">(36/29) </text:span> [ⲙ̅ⲡⲣ̅ϭⲱ]ϣⲧ̅’ ϭⲉ ⲉⲃⲟⲗ ϩⲏⲧⲥ̅ <text:line-break/><text:span text:style-name="T1"> </text:span><text:span text:style-name="T2">(36/30) </text:span> [ⲛ̅ⲧⲁⲛⲁⲥ]ⲧ̣ⲁⲥⲓⲥ ⲛ̅ⲥⲁⲣⲕⲓⲕⲏ <text:line-break/><text:span text:style-name="T1"> </text:span><text:span text:style-name="T2">(37/1) </text:span> [ⲉ]ⲧ̣ⲉ ⲡⲧⲉⲕⲟ [ⲡⲉ· ⲁⲩⲱ ⲙⲉⲩⲕⲟ]‐ <text:line-break/><text:span text:style-name="T1"> </text:span><text:span text:style-name="T2">(37/2) </text:span> [ⲕ]ⲟⲩ ⲁϩⲏⲟⲩ ⲙ[ⲙⲟⲥ ⲛ̅ϭⲓ ⲛⲉⲧⲣ̅]‐ <text:line-break/><text:span text:style-name="T1"> </text:span><text:span text:style-name="T2">(37/3) </text:span> ⲡ̣ⲗⲁⲛⲁⲥⲑⲁⲓ ⲉⲩ[ϭⲱϣⲧ̅’ ⲉⲃⲟⲗ] <text:line-break/><text:span text:style-name="T1"> </text:span><text:span text:style-name="T2">(37/4) </text:span> [ϩ]ⲏⲧϥ̅ ⲛ̅ⲛⲟⲩϭ̣ⲓ̣[ⲛⲧⲱⲟⲩⲛϥ̅] <text:line-break/><text:span text:style-name="T1"> </text:span><text:span text:style-name="T2">(37/5) </text:span> ⲉϥϣⲟⲩⲉⲓⲧ’· ⲉⲛ̣[ⲥⲉⲥⲟⲟⲩⲛ] <text:line-break/><text:span text:style-name="T1"> </text:span><text:span text:style-name="T2">(37/6) </text:span> ⲁⲛ ⲛ̅ⲧⲇⲩⲛⲁⲙ[ⲓⲥ ⲙ̅ⲡⲛⲟⲩⲧⲉ] <text:line-break/><text:span text:style-name="T1"> </text:span><text:span text:style-name="T2">(37/7) </text:span> ⲟⲩⲇⲉ ⲛ̅ⲥⲉⲣ̅ⲛⲟ[ⲉⲓ ⲁⲛ ⲙ̅ⲡⲃⲱⲗ] <text:line-break/><text:span text:style-name="T1"> </text:span><text:span text:style-name="T2">(37/8) </text:span> ⲛ̅ⲛⲉⲅⲣⲁⲫⲟⲟⲩ[ⲉ ⲉⲧⲃⲉ ⲧⲉⲩ] <text:line-break/><text:span text:style-name="T1"> </text:span><text:span text:style-name="T2">(37/9) </text:span> ⲙⲛ̅ⲧ’ϩ[ⲏ]ⲧ’ ⲥⲛ̣[ⲁⲩ· ⲡⲙⲩⲥⲧⲏ]‐ <text:line-break/><text:span text:style-name="T1"> </text:span><text:span text:style-name="T2">(37/10) </text:span> [ⲣ]ⲓⲟⲛ ⲉⲛ̣ⲧⲁϥ̣[ϫⲟⲟϥ ⲛ̅ϭⲓ ⲡϣⲏ]‐ <text:line-break/><text:span text:style-name="T1"> </text:span><text:span text:style-name="T2">(37/11) </text:span> ⲣ̣ⲉ̣ ⲙ̅ⲡⲣ̣[ⲱⲙⲉ <text:line-break/><text:span text:style-name="T1"> </text:span><text:span text:style-name="T2">(37/12) </text:span> ϫⲉⲕⲁ[ⲁⲥ <text:line-break/><text:span text:style-name="T1"> </text:span><text:span text:style-name="T2">(37/13) </text:span> ⲧⲉ̣ⲕⲟ[ <text:line-break/><text:span text:style-name="T1"> </text:span><text:span text:style-name="T2">(37/14) </text:span> [..]ⲛⲓⲕ[ <text:line-break/><text:span text:style-name="T1"> </text:span><text:span text:style-name="T2">(37/15) </text:span> [...].[ <text:line-break/><text:span text:style-name="T1"> </text:span><text:span text:style-name="T2">(37/16) </text:span> ⲣⲱⲙⲉ [ⲉ]ⲧ[ 9+- ϫⲱⲱ]‐ <text:line-break/><text:span text:style-name="T1"> </text:span><text:span text:style-name="T2">(37/17) </text:span> ⲙⲉ ⲉⲧ’ⲥⲏϩ̣ [ <text:line-break/><text:span text:style-name="T1"> </text:span><text:span text:style-name="T2">(37/18) </text:span> ϫⲉ ⲟⲩⲛ̅ⲧ̣ⲁ̣[ⲩ ⲙ̅ⲙⲁⲩ <text:line-break/><text:span text:style-name="T1"> </text:span><text:span text:style-name="T2">(37/19) </text:span> [..]ⲙⲏ[ <text:line-break/><text:span text:style-name="T1"> </text:span><text:span text:style-name="T2">(37/20) </text:span> ⲥⲙⲁ[ⲙⲁⲁⲧ’ <text:line-break/><text:span text:style-name="T1"> </text:span><text:span text:style-name="T2">(37/21) </text:span> ϩⲣⲁⲓ̈ ⲛ̣̅[ϩⲏⲧⲟⲩ· ⲁⲩⲱ ⲥⲉϣⲟ]‐ <text:line-break/><text:span text:style-name="T1"> </text:span><text:span text:style-name="T2">(37/22) </text:span> ⲟⲡ’ ⲛ̅ⲛⲁϩⲣⲛ̣̅ [ⲡⲛⲟⲩⲧⲉ ϩⲁ ⲡⲍⲩ]‐ <text:line-break/><text:span text:style-name="T1"> </text:span><text:span text:style-name="T2">(37/23) </text:span> ⲅⲓⲥⲕⲟⲛ ⲛ̅ϣ̣[ⲱⲱⲙⲉ· ⲛⲉⲧⲉ ⲙⲛ̅]‐ <text:line-break/><text:span text:style-name="T1"> </text:span><text:span text:style-name="T2">(37/24) </text:span> ⲧⲁⲩ ⲇⲉ ⲙ̅ⲙⲁⲩ [ⲙ̅ⲡⲗⲟⲅⲟⲥ ⲉⲧ’]‐ <text:line-break/><text:span text:style-name="T1"> </text:span><text:span text:style-name="T2">(37/25) </text:span> ⲧⲛ̅ϩⲟ ϩⲙ̅ ⲡⲉⲩ[ϩⲏⲧ’ ⲛⲁⲙⲟⲩ·] <text:line-break/><text:span text:style-name="T1"> </text:span><text:span text:style-name="T2">(37/26) </text:span> ⲁⲩⲱ ϩⲛ̅ ⲧⲛⲟⲏⲥ[ⲓⲥ ⲛ̅ⲧⲁⲩ]‐ <text:line-break/><text:span text:style-name="T1"> </text:span><text:span text:style-name="T2">(37/27) </text:span> ⲥⲉⲟⲩⲟⲛϩ ⲉⲃⲟⲗ ⲙ̅[ⲡϣⲏⲣⲉ] <text:line-break/><text:span text:style-name="T1"> </text:span><text:span text:style-name="T2">(37/28) </text:span> ⲙ̅ⲡⲣⲱⲙⲉ ⲕⲁⲧⲁ [ⲑⲉ ⲛ̅ⲧⲟⲩ] <text:line-break/><text:span text:style-name="T1"> </text:span><text:span text:style-name="T2">(37/29) </text:span> ⲡⲣⲁⲝⲓⲥ ⲙⲛ̅ ⲧⲟⲩⲡ[ⲗⲁⲛⲏ <text:line-break/><text:span text:style-name="T1"> </text:span><text:span text:style-name="T2">(38/1) </text:span> [ 7+- ] ⲛ̣̅ⲧⲉⲓ̈ⲙⲓⲛⲉ ⲥ[ⲉ] <text:line-break/><text:span text:style-name="T1"> </text:span><text:span text:style-name="T2">(38/2) </text:span> [ 7+- ] ⲉϥⲡⲱⲣϫ̅ ⲙ̅ⲡ[ <text:line-break/><text:span text:style-name="T1"> </text:span><text:span text:style-name="T2">(38/3) </text:span> [......ⲁ]ⲩⲱ ⲥⲉⲣ̅ⲛⲟⲉⲓ <text:line-break/><text:soft-page-break/><text:span text:style-name="T1"> </text:span><text:span text:style-name="T2">(38/4) </text:span> [ⲁⲛ ϫⲉ ϥⲛ̅]ⲛ̣ⲏⲟⲩ ⲛ̅ⲧⲟⲟⲧ̣ϥ̣̅ <text:line-break/><text:span text:style-name="T1"> </text:span><text:span text:style-name="T2">(38/5) </text:span> [ⲛ̅ϭⲓ ⲡϣⲏⲣⲉ] ⲙ̅ⲡⲣⲱⲙⲉ· <text:line-break/><text:span text:style-name="T1"> </text:span><text:span text:style-name="T2">(38/6) </text:span> [ⲛ̅ⲧⲁⲣⲟⲩ{ⲉ̅]̅ⲓ̣̅} ⲇⲉ ϣⲁϩⲣⲁⲓ̈ ⲉ <text:line-break/><text:span text:style-name="T1"> </text:span><text:span text:style-name="T2">(38/7) </text:span> [ 7+- ⲑ]ⲩⲥⲓⲁ· ⲉⲩⲙⲟⲩ <text:line-break/><text:span text:style-name="T1"> </text:span><text:span text:style-name="T2">(38/8) </text:span> [ϩⲛ̅ ⲟⲩⲙⲛ]ⲧ̣ⲣⲱⲙⲉ̣ ⲁⲩⲱ ⲉⲩ‐ <text:line-break/><text:span text:style-name="T1"> </text:span><text:span text:style-name="T2">(38/9) </text:span> [ⲣ̅ⲡⲁⲣⲁⲇⲓⲇⲟⲩ] ⲙ̅ⲙ[ⲟ]ⲟⲩ ⲟⲩⲁ̣‐ <text:line-break/><text:span text:style-name="T1"> </text:span><text:span text:style-name="T2">(38/10) </text:span> [ⲁⲩ 12+- ]ⲥⲉⲧ’ <text:line-break/><text:span text:style-name="T1"> </text:span><text:span text:style-name="T2">(38/11) </text:span> [ 12+- ] ⲙ̣[ⲛ̅ .]ⲉ̣. <text:line-break/><text:span text:style-name="T1"> </text:span><text:span text:style-name="T2">(38/12) </text:span> [ 12+- ]ⲟⲩⲙⲟⲩ <text:line-break/><text:span text:style-name="T1"> </text:span><text:span text:style-name="T2">(38/13) </text:span> [ 12+- ]ⲉⲧⲛ[ⲁ <text:line-break/><text:span text:style-name="T1"> </text:span><text:span text:style-name="T2">(38/14) </text:span> [ 13+- ]ϥ̣ϣⲁ̣ <text:line-break/><text:span text:style-name="T1"> </text:span><text:span text:style-name="T2">(38/15) </text:span> (1 line missing) <text:line-break/><text:span text:style-name="T1"> </text:span><text:span text:style-name="T2">(38/16) </text:span> [ 10+- ]ⲡⲉ ⲛⲉⲧ’ <text:line-break/><text:span text:style-name="T1"> </text:span><text:span text:style-name="T2">(38/17) </text:span> [ 10+- ].ⲛⲁϣⲱⲟⲩ <text:line-break/><text:span text:style-name="T1"> </text:span><text:span text:style-name="T2">(38/18) </text:span> [ 11+- ].ⲧ’̣· ⲡⲟⲩⲁ <text:line-break/><text:span text:style-name="T1"> </text:span><text:span text:style-name="T2">(38/19) </text:span> [ⲡⲟⲩⲁ 10+- ]ⲥ̣ⲱⲗ̣ <text:line-break/><text:span text:style-name="T1"> </text:span><text:span text:style-name="T2">(38/20) </text:span> [ⲉⲃⲟⲗ 10+- ⲛ]ⲟ̣ϥⲣⲉ <text:line-break/><text:span text:style-name="T1"> </text:span><text:span text:style-name="T2">(38/21) </text:span> [ 13+- ⲡⲉ]ⲩϩⲏⲧ’· <text:line-break/><text:span text:style-name="T1"> </text:span><text:span text:style-name="T2">(38/22) </text:span> [ⲛⲉⲧ’ϫⲓ ⲙ̅ⲙⲟ]ϥ̣ ⲇⲉ ⲉⲣⲟⲟⲩ <text:line-break/><text:span text:style-name="T1"> </text:span><text:span text:style-name="T2">(38/23) </text:span> [ϩⲛ̅ ⲟⲩⲥⲟⲟ]ⲩⲧⲛ̅ ⲙⲛ̅ ⲟⲩ‐ <text:line-break/><text:span text:style-name="T1"> </text:span><text:span text:style-name="T2">(38/24) </text:span> [ⲇⲩⲛⲁⲙⲓⲥ ⲙ]ⲛ̅ ⲅⲛⲱⲥⲓⲥ ⲛⲓⲙ <text:line-break/><text:span text:style-name="T1"> </text:span><text:span text:style-name="T2">(38/25) </text:span> [ⲛⲁⲓ̈ ⲛⲉ ⲛⲉⲧ]ϥ̣̅ⲛⲁⲡⲟⲟⲛⲟⲩ <text:line-break/><text:span text:style-name="T1"> </text:span><text:span text:style-name="T2">(38/26) </text:span> [ⲉϩⲣⲁⲓ̈ ⲉⲛⲉ]ⲧ’ϫⲟⲥⲉ ⲉϩⲟⲩⲛ <text:line-break/><text:span text:style-name="T1"> </text:span><text:span text:style-name="T2">(38/27) </text:span> [ⲉⲡⲱⲛϩ̅ ⲛ̅]ϣⲁ ⲉⲛⲉϩ· ⲛⲉⲧ’ϫⲓ <text:line-break/><text:span text:style-name="T1"> </text:span><text:span text:style-name="T2">(38/28) </text:span> [ⲇⲉ ⲙ̅ⲙ]ⲟϥ ⲉⲣⲟⲟⲩ ϩⲛ̅ ⲟⲩⲙⲛ̣̅ⲧ’‐ <text:line-break/><text:span text:style-name="T1"> </text:span><text:span text:style-name="T2">(38/29) </text:span> [ⲁⲧ’ⲥⲟⲟ]ⲩⲛ ⲉⲛϩⲏⲇⲟⲛⲏ <text:line-break/><text:span text:style-name="T1"> </text:span><text:span text:style-name="T2">(39/1) </text:span> ⲉ̣ⲧ’ϫⲁϩⲙ̅ ϫⲣⲟⲉⲓⲧ’ ⲉⲣⲟ[ⲟⲩ· ⲛⲉ]‐ <text:line-break/><text:span text:style-name="T1"> </text:span><text:span text:style-name="T2">(39/2) </text:span> ⲧ̣ⲙ̅ⲙⲁⲩ ⲛⲉϣⲁⲩϫⲟ[ⲟⲥ ϫⲉ ⲁ]‐ <text:line-break/><text:span text:style-name="T1"> </text:span><text:span text:style-name="T2">(39/3) </text:span> ⲡⲛⲟⲩⲧⲉ ⲧⲁⲙⲓⲉ ϩⲉ̣[ⲛⲙⲉⲗⲟⲥ] <text:line-break/><text:span text:style-name="T1"> </text:span><text:span text:style-name="T2">(39/4) </text:span> ⲉⲩⲭⲣⲓⲁ ⲛⲁⲛ ⲉⲧⲣⲉⲛⲁ̣[ϣⲁⲓ ϩⲛ̅] <text:line-break/><text:span text:style-name="T1"> </text:span><text:span text:style-name="T2">(39/5) </text:span> ⲟⲩϫⲱϩⲙ̅̓ ϫⲉⲕⲁ̣ⲁ[ⲥ ⲉⲛⲛⲁⲣ̅]‐ <text:line-break/><text:span text:style-name="T1"> </text:span><text:span text:style-name="T2">(39/6) </text:span> ⲁⲡⲟⲗⲁⲩⲉ ⲙ̣̅ⲙ̣[ⲟⲛ ⲟⲁⲁⲛ·] <text:line-break/><text:span text:style-name="T1"> </text:span><text:span text:style-name="T2">(39/7) </text:span> ⲁⲩⲱ ⲥⲉⲧⲣⲉⲡ̣ⲛⲟ̣[ⲩⲧⲉ] <text:line-break/><text:span text:style-name="T1"> </text:span><text:span text:style-name="T2">(39/8) </text:span> ⲣ̅ ⲙⲉⲧⲟⲭⲟⲥ ⲛⲙ̣̅ⲙ̣ⲁ̣ⲩ [ⲛ̅ϩⲉⲛ]‐ <text:line-break/><text:span text:style-name="T1"> </text:span><text:span text:style-name="T2">(39/9) </text:span> ϩⲃⲏⲩⲉ ⲛ̅ⲧⲉⲓ̣̈[ⲙⲓⲛⲉ· ⲁⲩⲱ] <text:line-break/><text:span text:style-name="T1"> </text:span><text:span text:style-name="T2">(39/10) </text:span> ⲛ̅ⲥⲉⲧⲁϫⲣⲏ̣[ⲟⲩ ⲁⲛ ϩⲓϫⲙ̅] <text:line-break/><text:span text:style-name="T1"> </text:span><text:span text:style-name="T2">(39/11) </text:span> ⲡⲕⲁϩ· ⲟⲩ[ⲇⲉ ⲛ̅ⲥⲉⲛⲁⲡⲱϩ ⲁⲛ] <text:line-break/><text:span text:style-name="T1"> </text:span><text:span text:style-name="T2">(39/12) </text:span> ⲉⲧⲡⲉ· ⲁⲗ[ⲗⲁ <text:line-break/><text:span text:style-name="T1"> </text:span><text:span text:style-name="T2">(39/13) </text:span> ⲧⲟⲡⲟⲥ ⲛⲁ̣[ <text:line-break/><text:span text:style-name="T1"> </text:span><text:span text:style-name="T2">(39/14) </text:span> ϥ̣ⲧⲟⲉ .[ <text:line-break/><text:span text:style-name="T1"> </text:span><text:span text:style-name="T2">(39/15) </text:span> (3 lines missing) <text:line-break/><text:span text:style-name="T1"> </text:span><text:span text:style-name="T2">(39/18) </text:span> ⲛ̣̅ⲁⲧⲱϣ[ⲙ̅ <text:line-break/><text:span text:style-name="T1"> </text:span><text:span text:style-name="T2">(39/19) </text:span> ⲉⲧⲙ̅ⲡⲥⲁ[ <text:line-break/><text:span text:style-name="T1"> </text:span><text:span text:style-name="T2">(39/20) </text:span> ϫ̣ⲱ̣[ <text:line-break/><text:span text:style-name="T1"> </text:span><text:span text:style-name="T2">(39/21) </text:span> [.]ⲗ̣.[ 13+- ⲗⲟ] <text:line-break/><text:span text:style-name="T1"> </text:span><text:span text:style-name="T2">(39/22) </text:span> ⲅⲟⲥ [ <text:line-break/><text:span text:style-name="T1"> </text:span><text:span text:style-name="T2">(39/23) </text:span> ⲉϫⲙ̅ [ⲡⲓⲟⲣⲇⲁⲛⲏⲥ ⲡⲓⲉⲣⲟ] <text:line-break/><text:soft-page-break/><text:span text:style-name="T1"> </text:span><text:span text:style-name="T2">(39/24) </text:span> ⲛⲧⲁⲣⲉϥ{ⲉ̅ⲓ} ϣ̣[ⲁ ⲓ̈ⲱϩⲁⲛⲛⲏⲥ ⲙ̅] <text:line-break/><text:span text:style-name="T1"> </text:span><text:span text:style-name="T2">(39/25) </text:span> ⲡⲥⲟⲡ’ ⲉⲧⲁϥ[ϫⲓ ⲃⲁⲡⲧⲓⲥⲙⲁ] <text:line-break/><text:span text:style-name="T1"> </text:span><text:span text:style-name="T2">(39/26) </text:span> ⲁⲡⲉⲡ̅ⲛ̅ⲁ̅ ⲉⲧ[ⲟⲩⲁⲁⲃ {ⲉⲓ}] <text:line-break/><text:span text:style-name="T1"> </text:span><text:span text:style-name="T2">(39/27) </text:span> ⲉϩⲣⲁⲓ̈ ⲉϫⲱϥ ⲛ̣̅[ⲑⲉ ⲛ̅ⲟⲩ] <text:line-break/><text:span text:style-name="T1"> </text:span><text:span text:style-name="T2">(39/28) </text:span> ϭⲣⲟⲟⲙⲡⲉ· ⲟⲩ[ <text:line-break/><text:span text:style-name="T1"> </text:span><text:span text:style-name="T2">(39/29) </text:span> ϫⲓ ⲉⲣⲟⲛ ϫⲉ ⲁⲩϫⲡ̣[ⲟϥ ⲉⲃⲟⲗ] <text:line-break/><text:span text:style-name="T1"> </text:span><text:span text:style-name="T2">(39/30) </text:span> ϩⲓ̅ⲧⲛ̅ ⲟⲩⲡⲁⲣⲑⲉ[ⲛⲟⲥ ⲁⲩⲱ] <text:line-break/><text:span text:style-name="T1"> </text:span><text:span text:style-name="T2">(39/31) </text:span> ⲁϥϫⲓ ⲥⲁⲣⲁⲝ ⲁϥⲥ̣[ <text:line-break/><text:span text:style-name="T1"> </text:span><text:span text:style-name="T2">(40/1) </text:span> [..ⲉⲁϥ]ϫ̣ⲓ ⲛ̅ⲛⲟⲩϭⲟⲙ· ⲙⲏⲧⲓ <text:line-break/><text:span text:style-name="T1"> </text:span><text:span text:style-name="T2">(40/2) </text:span> [ⲁⲛⲟⲛ ϩⲱ]ⲱⲛ ⲛ̅ⲧⲁⲩϫⲡⲟⲛ ⲉⲃⲟⲗ <text:line-break/><text:span text:style-name="T1"> </text:span><text:span text:style-name="T2">(40/3) </text:span> [ϩⲓ̅ⲧⲛ̅ ⲟⲩⲥ]ⲩⲥⲧⲁⲥⲓⲥ ⲙ̅ⲡⲁⲣⲑⲉ <text:line-break/><text:span text:style-name="T1"> </text:span><text:span text:style-name="T2">(40/4) </text:span> [ⲛⲓⲕⲏ ⲏ%0 ⲉⲩ]ⲱ ⲙ̅ⲙⲟⲛ ϩⲙ̅ ⲡⲗⲟⲅⲟⲥ <text:line-break/><text:span text:style-name="T1"> </text:span><text:span text:style-name="T2">(40/5) </text:span> [ⲛ̅ϩⲟⲩⲟ ⲁⲩϫⲡⲟ]ⲛ̣ ⲛ̅ⲕⲉⲥⲟⲡ’ ϩⲙ̅ <text:line-break/><text:span text:style-name="T1"> </text:span><text:span text:style-name="T2">(40/6) </text:span> [ⲡⲗⲟⲅⲟⲥ·] ⲙⲁⲣⲛ̣̅ⲧⲁϫⲣⲟⲛ ϭⲉ <text:line-break/><text:span text:style-name="T1"> </text:span><text:span text:style-name="T2">(40/7) </text:span> [ⲟⲩⲁⲁⲛ] ⲙ̅ⲡⲁⲣⲑⲉⲛⲟⲥ ϩⲛ̅ ⲛⲉ <text:line-break/><text:span text:style-name="T1"> </text:span><text:span text:style-name="T2">(40/8) </text:span> [ 7+- ] ⲛ̅ϩⲟⲟⲩⲧ’ ⲥⲉⲟⲩⲏϩ <text:line-break/><text:span text:style-name="T1"> </text:span><text:span text:style-name="T2">(40/9) </text:span> [ 9+- ] ⲧⲡⲁⲣⲑⲉⲛⲟⲥ <text:line-break/><text:span text:style-name="T1"> </text:span><text:span text:style-name="T2">(40/10) </text:span> [ 9+- ] ⲉⲃⲟⲗ̣ ϩⲓ̅ⲧⲟⲟ <text:line-break/><text:span text:style-name="T1"> </text:span><text:span text:style-name="T2">(40/11) </text:span> [ⲧ%1 7+- ] ϩⲙ̅ ⲡϣⲁϫⲉ <text:line-break/><text:span text:style-name="T1"> </text:span><text:span text:style-name="T2">(40/12) </text:span> [ 9+- ] ⲡⲗⲟⲅⲟⲥ ⲇⲉ ⲛ̅ <text:line-break/><text:span text:style-name="T1"> </text:span><text:span text:style-name="T2">(40/13) </text:span> [ 12+- ]. ⲙ̣ⲛ̅ ⲡ̅ⲛ̣̅̅[̅ⲁ̅]̅ <text:line-break/><text:span text:style-name="T1"> </text:span><text:span text:style-name="T2">(40/14) </text:span> (3 lines missing) <text:line-break/><text:span text:style-name="T1"> </text:span><text:span text:style-name="T2">(40/17) </text:span> [ 12+- ].[...].[ <text:line-break/><text:span text:style-name="T1"> </text:span><text:span text:style-name="T2">(40/18) </text:span> [ 12+- ] ⲡⲓⲱⲧ’ ⲡⲉ <text:line-break/><text:span text:style-name="T1"> </text:span><text:span text:style-name="T2">(40/19) </text:span> [ 11+- ]. ϫⲉ ⲡⲣ̣ⲱⲙ̣ⲉ <text:line-break/><text:span text:style-name="T1"> </text:span><text:span text:style-name="T2">(40/20) </text:span> (1 line missing) <text:line-break/><text:span text:style-name="T1"> </text:span><text:span text:style-name="T2">(40/21) </text:span> [ⲛ̅ⲑⲉ ⲛ̅ⲏ̅ⲥ̅ⲁ̅ⲓ̅ⲁ̅ⲥ̅· ⲛ̅ⲧⲁⲩ]ⲟⲩⲁⲥ‐ <text:line-break/><text:span text:style-name="T1"> </text:span><text:span text:style-name="T2">(40/22) </text:span> [ⲧϥ̅ ϩⲛ̅ ⲟⲩⲃⲁϣⲟⲩⲣ ⲁ]ϥⲣ̅ ⲥⲛⲁⲩ <text:line-break/><text:span text:style-name="T1"> </text:span><text:span text:style-name="T2">(40/23) </text:span> [ⲛ̅ⲧⲉⲓϩⲉ ⲇⲉ ⲉϥⲡⲱⲣϫ̅] ⲙ̣̅ⲙⲟⲛ <text:line-break/><text:span text:style-name="T1"> </text:span><text:span text:style-name="T2">(40/24) </text:span> [ⲛ̅ϭⲓ ⲡϣⲏⲣⲉ ⲙ̅ⲡⲣ]ⲱⲙⲉ ϩⲓ̅ⲧⲙ̅ <text:line-break/><text:span text:style-name="T1"> </text:span><text:span text:style-name="T2">(40/25) </text:span> [ⲡⲗⲟⲅⲟⲥ ⲙ̅ⲡⲉ]ⲥ̅x̅ⲟ̅ⲥ̅· ⲉϥⲡⲱ‐ <text:line-break/><text:span text:style-name="T1"> </text:span><text:span text:style-name="T2">(40/26) </text:span> [ⲣϫ̅ ⲙ̅ⲫⲟⲟⲩ] ⲉ̣ⲧⲟⲩϣⲏ· ⲁⲩⲱ <text:line-break/><text:span text:style-name="T1"> </text:span><text:span text:style-name="T2">(40/27) </text:span> [ⲡⲟⲩⲟⲉⲓⲛ ⲉⲡ]ⲕⲁⲕⲉ· ⲁⲩⲱ ⲡⲧⲉ‐ <text:line-break/><text:span text:style-name="T1"> </text:span><text:span text:style-name="T2">(40/28) </text:span> [ⲕⲟ ⲉⲧⲙⲛ̅ⲧ’]ⲁⲧ’ⲧⲉⲕⲟ· ⲁⲩⲱ ⲉϥ‐ <text:line-break/><text:span text:style-name="T1"> </text:span><text:span text:style-name="T2">(40/29) </text:span> [ⲡⲱⲣϫ̅ ⲛ̅]ⲛ̣̅ϩⲟⲟⲩⲧ’ ⲉⲛⲉϩⲓ̅ⲟⲙⲉ <text:line-break/><text:span text:style-name="T1"> </text:span><text:span text:style-name="T2">(40/30) </text:span> [ⲏ̅ⲥ̅ⲁ̅ⲓ̅ⲁ̅ⲥ̅] ⲇⲉ ⲉϥⲟ ⲙ̅ⲡⲧⲩⲡⲟⲥ <text:line-break/><text:span text:style-name="T1"> </text:span><text:span text:style-name="T2">(41/1) </text:span> ⲙ̣̅ⲡⲥⲱⲙⲁ· ⲧⲃⲁϣⲟⲩⲣ <text:line-break/><text:span text:style-name="T1"> </text:span><text:span text:style-name="T2">(41/2) </text:span> ⲇⲉ ⲡⲉ ⲡⲗⲟⲅⲟⲥ ⲙ̅ⲡϣⲏⲣⲉ ⲙ̅‐ <text:line-break/><text:span text:style-name="T1"> </text:span><text:span text:style-name="T2">(41/3) </text:span> ⲡⲣⲱⲙⲉ ⲉⲧ’ⲡⲱⲣϫ̅ ⲙⲙⲟⲛ ⲉⲧ’‐ <text:line-break/><text:span text:style-name="T1"> </text:span><text:span text:style-name="T2">(41/4) </text:span> ⲡⲗⲁⲛⲏ ⲛ̅ⲛ̅ⲁⲅ’ⲅⲉⲗⲟⲥ· ⲙ̅ⲙⲛ̅ⲗⲁ‐ <text:line-break/><text:span text:style-name="T1"> </text:span><text:span text:style-name="T2">(41/5) </text:span> ⲁⲩ ⲇⲉ ⲥⲟⲟⲩⲛ ⲙ̅ⲡⲛⲟⲩⲧⲉ ⲛ̅ⲧⲙⲉ <text:line-break/><text:span text:style-name="T1"> </text:span><text:span text:style-name="T2">(41/6) </text:span> ⲉⲓⲙⲏⲧⲓ ⲡⲣⲱⲙⲉ ⲟⲩⲁⲁϥ ⲡⲁⲓ̈ <text:line-break/><text:span text:style-name="T1"> </text:span><text:span text:style-name="T2">(41/7) </text:span> ⲉⲧⲛⲁⲕⲱ ⲛ̅ⲥⲱϥ ⲛ̅ⲛⲉϩⲃⲏⲩⲉ <text:line-break/><text:span text:style-name="T1"> </text:span><text:span text:style-name="T2">(41/8) </text:span> ⲧⲏⲣⲟⲩ ⲙ̅ⲡⲕⲟⲥⲙⲟⲥ· ⲉⲁϥⲣ̅ⲁ‐ <text:line-break/><text:span text:style-name="T1"> </text:span><text:span text:style-name="T2">(41/9) </text:span> ⲡⲟⲧⲁⲥⲥⲉ ⲙ̅ⲡⲙⲁ ⲧⲏⲣϥ̅· ⲉⲁϥⲁ‐ <text:line-break/><text:span text:style-name="T1"> </text:span><text:span text:style-name="T2">(41/10) </text:span> ⲙⲁϩⲧⲉ ⲙ̅ⲡⲗⲁⲩ ⲛ̅ⲧⲉϥϣ̣ⲧⲏⲛ· <text:line-break/><text:span text:style-name="T1"> </text:span><text:span text:style-name="T2">(41/11) </text:span> ⲁϥⲧⲁϩⲟϥ ⲉⲣ̣ⲁⲧϥ̅ ⲛ̅ⲟ̣[ⲩϭⲟ]ⲙ· <text:line-break/><text:soft-page-break/><text:span text:style-name="T1"> </text:span><text:span text:style-name="T2">(41/12) </text:span> ⲁϥⲑⲣ̅ⲕⲟ ⲛ̅ⲧⲉⲡⲓ̣ⲑ̣ⲩⲙ̣[ⲓⲁ ⲙ̅ⲙ]ⲁ <text:line-break/><text:span text:style-name="T1"> </text:span><text:span text:style-name="T2">(41/13) </text:span> ⲛⲓⲙ ϩⲣⲁⲓ̈ ⲛ̅ϩⲏⲧϥ̅· ⲁϥⲁ.[....]ⲩ̣ⲧ’̣ <text:line-break/><text:span text:style-name="T1"> </text:span><text:span text:style-name="T2">(41/14) </text:span> ⲁⲩⲱ ⲁϥⲕⲧⲟϥ ⲉⲣⲟϥ ⲟ̣ⲩ[....]ⲁ̣. <text:line-break/><text:span text:style-name="T1"> </text:span><text:span text:style-name="T2">(41/15) </text:span> ⲉ̣ⲁϥⲙⲟⲩϣⲧ̅’ ⲟⲩⲁⲁϥ .[ <text:line-break/><text:span text:style-name="T1"> </text:span><text:span text:style-name="T2">(41/16) </text:span> ⲟ̣ⲥ̣ ϩⲙ̅ ⲡϣⲱⲡⲉ ⲛ̣̅ⲧ̣[ <text:line-break/><text:span text:style-name="T1"> </text:span><text:span text:style-name="T2">(41/17) </text:span> [ⲡ]ⲛⲟⲩⲥ ⲁ̣ⲩⲱ̣ ⲁ̣[ϥ....ⲉⲃ]ⲟ̣ⲗ̣ <text:line-break/><text:span text:style-name="T1"> </text:span><text:span text:style-name="T2">(41/18) </text:span> [ϩⲛ̅] ⲧⲉϥⲯⲩⲭ̣[ⲏ...]ⲛ̅[ <text:line-break/><text:span text:style-name="T1"> </text:span><text:span text:style-name="T2">(41/19) </text:span> ⲙ̅ⲙⲁⲩ· ϫ̣[ <text:line-break/><text:span text:style-name="T1"> </text:span><text:span text:style-name="T2">(41/20) </text:span> [..]ⲧ’̣ ⲁϥⲣ̅[ <text:line-break/><text:span text:style-name="T1"> </text:span><text:span text:style-name="T2">(41/21) </text:span> [.].[..]ⲟ̣ⲥ .[ <text:line-break/><text:span text:style-name="T1"> </text:span><text:span text:style-name="T2">(41/22) </text:span> ⲁϣ ⲧⲉ ⲑⲉ [ <text:line-break/><text:span text:style-name="T1"> </text:span><text:span text:style-name="T2">(41/23) </text:span> ⲧⲥⲁⲣⲁⲝ ⲉⲥ̣[ <text:line-break/><text:span text:style-name="T1"> </text:span><text:span text:style-name="T2">(41/24) </text:span> ⲁϣ ⲧⲉ ⲑⲉ ⲉ̣[ <text:line-break/><text:span text:style-name="T1"> </text:span><text:span text:style-name="T2">(41/25) </text:span> ⲃⲟⲗ ⲛ̅ϩⲏⲧⲥ̅· ⲁⲩⲱ ϫⲉ [ⲟⲩⲛ̅ⲧⲁϥ] <text:line-break/><text:span text:style-name="T1"> </text:span><text:span text:style-name="T2">(41/26) </text:span> ⲙ̅ⲙⲁⲩ ⲛ̅ⲟⲩⲏⲣ ⲛ̅ⲇⲩ[ⲛⲁⲙⲓⲥ]· <text:line-break/><text:span text:style-name="T1"> </text:span><text:span text:style-name="T2">(41/27) </text:span> ⲁⲩⲱ ϫⲉ ⲛⲓⲙ ⲡⲉⲛⲧⲁϥⲙ[ⲟ]ⲣ̣ⲉϥ <text:line-break/><text:span text:style-name="T1"> </text:span><text:span text:style-name="T2">(41/28) </text:span> ⲏ%0 ⲛⲓⲙ ⲡⲉⲧⲛⲁⲃⲟⲗⲉϥ· ⲛⲓⲙ ⲇⲉ <text:line-break/><text:span text:style-name="T1"> </text:span><text:span text:style-name="T2">(41/29) </text:span> ⲡⲉ ⲡⲟⲩⲟⲉⲓⲛ· ⲏ%0 ⲛⲓⲙ ⲡⲉ ⲡⲕⲁⲕⲉ <text:line-break/><text:span text:style-name="T1"> </text:span><text:span text:style-name="T2">(41/30) </text:span> ⲛⲓⲙ ⲇⲉ ⲡⲉⲛⲧⲁϥⲧⲁⲙ̣[ⲓⲉ ⲡⲕⲁϩ·] <text:line-break/><text:span text:style-name="T1"> </text:span><text:span text:style-name="T2">(41/31) </text:span> ⲏ%0 ⲛⲓⲙ ⲡⲉ ⲡⲛⲟⲩⲧⲉ[· ⲛⲓⲙ ⲇⲉ] <text:line-break/><text:span text:style-name="T1"> </text:span><text:span text:style-name="T2">(42/1) </text:span> ⲡⲉ ⲛ̅ⲁⲅ’ⲅⲉⲗⲟⲥ ⲏ%0 ⲉⲩ ⲡⲉ ⲯⲩⲭⲏ <text:line-break/><text:span text:style-name="T1"> </text:span><text:span text:style-name="T2">(42/2) </text:span> ⲁⲩⲱ ⲛⲓⲙ ⲡⲉ ⲡ̅ⲛ̅ⲁ̅· ⲏ%0 ⲉⲣⲉ ⲧⲥⲙⲏ‐ <text:line-break/><text:span text:style-name="T1"> </text:span><text:span text:style-name="T2">(42/3) </text:span> ⲧⲱⲛ· ⲛⲓⲙ ⲇⲉ ⲡⲉⲧ’ϣⲁϫⲉ· ⲏ%0 ⲛⲓⲙ <text:line-break/><text:span text:style-name="T1"> </text:span><text:span text:style-name="T2">(42/4) </text:span> ⲡⲉⲧ’ⲥⲱⲧⲙ̅. ⲛⲓⲙ ⲡⲉⲧ’ϯ ⲧⲕⲁⲥ <text:line-break/><text:span text:style-name="T1"> </text:span><text:span text:style-name="T2">(42/5) </text:span> ⲏ%0 ⲛⲓⲙ ⲡⲉⲧ’ⲙⲟⲕϩ̅· ⲁⲩⲱ ⲛⲓⲙ <text:line-break/><text:span text:style-name="T1"> </text:span><text:span text:style-name="T2">(42/6) </text:span> ⲡⲉ ⲉⲧⲁϩϫⲡⲉ ⲧⲥⲁⲣⲁⲝ ⲛ̅ⲣⲉϥⲧⲉ‐ <text:line-break/><text:span text:style-name="T1"> </text:span><text:span text:style-name="T2">(42/7) </text:span> ⲕⲟ· ⲁⲩⲱ ⲁϣ ⲧⲉ ϯⲟⲓⲕⲟⲛⲟⲙⲓⲁ· <text:line-break/><text:span text:style-name="T1"> </text:span><text:span text:style-name="T2">(42/8) </text:span> ⲁⲩⲱ ⲉⲧⲃⲉ ⲟⲩ· ⲟⲩⲛ̅ ϩⲟⲉⲓⲛⲉ ⲙⲉⲛ <text:line-break/><text:span text:style-name="T1"> </text:span><text:span text:style-name="T2">(42/9) </text:span> ⲥⲉⲉ ⲛ̅ϭⲁⲗⲉ· ⲟⲩⲛ̅ ϩⲟⲉⲓⲛⲉ ⲇⲉ <text:line-break/><text:span text:style-name="T1"> </text:span><text:span text:style-name="T2">(42/10) </text:span> ⲥⲉ[ⲉ ⲛ̅ⲃⲗ̅]ⲗⲉ· ⲁⲩⲱ ϩⲟⲉⲓⲛⲉ ⲉⲩⲉ <text:line-break/><text:span text:style-name="T1"> </text:span><text:span text:style-name="T2">(42/11) </text:span> ⲛ̅[....]· ⲁⲩⲱ ϩⲟⲉⲓⲛⲉ ⲉⲩⲟ ⲛ̅ <text:line-break/><text:span text:style-name="T1"> </text:span><text:span text:style-name="T2">(42/12) </text:span> [....]ⲟⲥ· ⲁⲩⲱ ⲟⲩⲛ̅ ϩⲟⲉⲓⲛⲉ <text:line-break/><text:span text:style-name="T1"> </text:span><text:span text:style-name="T2">(42/13) </text:span> [ⲥⲉⲉ ⲛ̅]ⲣ̣ⲙ̅ⲙⲁⲟ· ⲟⲩⲛ̅ ϩⲟⲉⲓⲛⲉ <text:line-break/><text:span text:style-name="T1"> </text:span><text:span text:style-name="T2">(42/14) </text:span> [ⲇⲉ ⲥⲉⲉ] ⲛ̅ϩⲏⲕⲉ· ⲁⲩⲱ ⲉⲧⲃ[ⲉ] <text:line-break/><text:span text:style-name="T1"> </text:span><text:span text:style-name="T2">(42/15) </text:span> ⲟ[ⲩ ⲟⲩⲛ̅ ϩⲟⲉ]ⲓⲛⲉ ⲥⲉⲉ ⲛ̅ϭⲱ̣[ⲃ] <text:line-break/><text:span text:style-name="T1"> </text:span><text:span text:style-name="T2">(42/16) </text:span> ⲟ[ⲩⲛ̅ ϩⲟⲉⲓⲛ]ⲉ̣ ⲥ̣[ⲉⲉ] ⲛ̅ⲗⲏⲥⲧ̣[ⲏⲥ] <text:line-break/><text:span text:style-name="T1"> </text:span><text:span text:style-name="T2">(42/17) </text:span> [ 12+- ]ⲟⲩ· ⲟⲩⲇⲉ <text:line-break/><text:span text:style-name="T1"> </text:span><text:span text:style-name="T2">(42/18) </text:span> [ 13+- ]ⲉϣⲁ̣[ <text:line-break/><text:span text:style-name="T1"> </text:span><text:span text:style-name="T2">(42/19) </text:span> [ 10+- ⲧⲏ]ⲣϥ̅ [.].[ <text:line-break/><text:span text:style-name="T1"> </text:span><text:span text:style-name="T2">(42/20) </text:span> [ 12+- ]ϩⲃⲏⲟⲩⲉ <text:line-break/><text:span text:style-name="T1"> </text:span><text:span text:style-name="T2">(42/21) </text:span> [ 9+- ].ⲧⲟⲩ· ⲉⲁϥ <text:line-break/><text:span text:style-name="T1"> </text:span><text:span text:style-name="T2">(42/22) </text:span> [ 12+- ]ⲩ ⲉϥⲥⲱⲧ’ <text:line-break/><text:span text:style-name="T1"> </text:span><text:span text:style-name="T2">(42/23) </text:span> [ 8+- ]..[.] ⲉϥⲙⲓϣⲉ <text:line-break/><text:span text:style-name="T1"> </text:span><text:span text:style-name="T2">(42/24) </text:span> ⲁϩ[ⲉⲛⲙ]ⲉⲉⲩⲉ ⲛ̅ⲧⲉ ⲛ̅ⲁⲣⲭⲱⲛ· <text:line-break/><text:span text:style-name="T1"> </text:span><text:span text:style-name="T2">(42/25) </text:span> ⲙⲛ̣̅ [ⲛ̅ⲉ]ⲝ̣ⲟⲩⲥⲓⲁ ⲙⲛ̅ ⲛ̅ⲇⲁⲓⲙⲱⲛ <text:line-break/><text:span text:style-name="T1"> </text:span><text:span text:style-name="T2">(42/26) </text:span> ⲉⲙⲡ̣ϥ̣̅ϯ ⲛⲁⲩ ⲛ̅ⲛⲟⲩⲧⲟⲡⲟⲥ <text:line-break/><text:span text:style-name="T1"> </text:span><text:span text:style-name="T2">(42/27) </text:span> ⲉⲧⲣⲉⲩⲙ̅ⲧⲟⲛ ⲙ̅ⲙⲟⲟⲩ ⲛ̅ϩⲏⲧϥ̅· <text:line-break/><text:soft-page-break/><text:span text:style-name="T1"> </text:span><text:span text:style-name="T2">(42/28) </text:span> [ⲁⲗⲗ]ⲁ̣ [ⲁ]ϥϯ ⲉϩⲛ̅ ⲛⲉⲩⲡⲁⲑⲟⲥ· <text:line-break/><text:span text:style-name="T1"> </text:span><text:span text:style-name="T2">(42/29) </text:span> [......ⲁ]ϥ̣ⲣ̅ⲕⲁⲧⲁⲅⲓⲛⲱⲥⲕⲉ <text:line-break/><text:span text:style-name="T1"> </text:span><text:span text:style-name="T2">(43/1) </text:span> ⲛ̣̅ⲧⲉⲩⲡⲗⲁⲛⲏ· ⲁϥⲧⲟⲩⲃⲟ ⲛ̅ⲧⲉϥ <text:line-break/><text:span text:style-name="T1"> </text:span><text:span text:style-name="T2">(43/2) </text:span> ⲯⲩⲭⲏ ⲉⲃⲟⲗ ϩⲛ̅ ⲛⲙ̅ⲡⲁⲣⲁⲡⲧⲱⲙⲁ <text:line-break/><text:span text:style-name="T1"> </text:span><text:span text:style-name="T2">(43/3) </text:span> ⲛⲁⲓ̈ ⲛ̅ⲧⲁϥⲁⲁⲩ ϩⲛ̅ ⲟⲩϭⲓϫ ⲛ̅ϣⲙ̅ⲙⲟ· <text:line-break/><text:span text:style-name="T1"> </text:span><text:span text:style-name="T2">(43/4) </text:span> ⲁϥⲱϩⲉⲣⲁⲧϥ̅ ⲉϥⲥⲟⲩⲧⲱⲛ ⲛ̅ϩⲣⲁⲓ̈ <text:line-break/><text:span text:style-name="T1"> </text:span><text:span text:style-name="T2">(43/5) </text:span> ⲛ̅ϩⲏⲧϥ̅ ⲟⲩⲁⲁϥ· ϫⲉ ϥϣⲟⲟⲡ’ ϩⲛ̅ <text:line-break/><text:span text:style-name="T1"> </text:span><text:span text:style-name="T2">(43/6) </text:span> ⲟⲩⲟⲛ ⲛⲓⲙ̓ ⲁⲩⲱ ϫⲉ ⲟⲩⲛ̅ⲧⲁϥ <text:line-break/><text:span text:style-name="T1"> </text:span><text:span text:style-name="T2">(43/7) </text:span> ⲙ̅ⲙⲁⲩ ⲙ̅ⲡⲙⲟⲩ ⲙⲛ̅ ⲡⲱⲛϩ̅ <text:line-break/><text:span text:style-name="T1"> </text:span><text:span text:style-name="T2">(43/8) </text:span> ⲛ̅ϩⲣⲁⲓ̈ ⲛ̅ϩⲏⲧϥ̅· ⲛ̅ⲧⲟϥ ⲇⲉ ⲉϥϣⲟ‐ <text:line-break/><text:span text:style-name="T1"> </text:span><text:span text:style-name="T2">(43/9) </text:span> ⲟⲡ’ ϩⲛ̅ ⲧⲉⲩⲙⲏⲧⲉ ⲙ̅ⲡⲉⲥⲛⲁⲩ· <text:line-break/><text:span text:style-name="T1"> </text:span><text:span text:style-name="T2">(43/10) </text:span> ⲛ̅ⲧⲁⲣⲉϥϫⲓ ⲇⲉ ⲛ̅ⲧ’ⲇⲩⲛⲁⲙⲓⲥ <text:line-break/><text:span text:style-name="T1"> </text:span><text:span text:style-name="T2">(43/11) </text:span> ⲁϥⲕⲟⲧϥ̅ ⲉⲛⲙⲉⲣⲟⲥ ⲛ̅ⲟⲩⲛⲁⲙ· <text:line-break/><text:span text:style-name="T1"> </text:span><text:span text:style-name="T2">(43/12) </text:span> ⲁⲩⲱ ⲁϥⲃⲱⲕ ⲉϩⲣⲁⲓ̈ ϣⲁ ⲧⲙⲉ <text:line-break/><text:span text:style-name="T1"> </text:span><text:span text:style-name="T2">(43/13) </text:span> ⲉⲁϥⲕⲱ ⲛ̅ⲥⲱϥ̣ ⲛ̅ⲛⲁ ϭⲃⲟⲩⲣ <text:line-break/><text:span text:style-name="T1"> </text:span><text:span text:style-name="T2">(43/14) </text:span> ⲧⲏⲣⲟⲩ· ⲉⲁϥⲙⲟⲩϩ ⲛ̅ⲥⲟⲫⲓⲁ <text:line-break/><text:span text:style-name="T1"> </text:span><text:span text:style-name="T2">(43/15) </text:span> ϩⲓ̅ ϣⲟϫⲛⲉ ϩⲓ̅ ⲙⲛ̅ⲧⲣⲙ̅ⲛ̅ϩⲏⲧ’ <text:line-break/><text:span text:style-name="T1"> </text:span><text:span text:style-name="T2">(43/16) </text:span> ⲙⲛ̅ ϩⲉⲛⲙⲛ̅ⲧ’ⲥⲁⲃⲉ̣· ⲁⲩⲱ ⲟⲩ‐ <text:line-break/><text:span text:style-name="T1"> </text:span><text:span text:style-name="T2">(43/17) </text:span> ⲇⲩⲛⲁⲙⲓⲥ ⲛ̅ϣⲁ ⲉⲛⲉϩ [ⲁⲩ]ⲱ̣ <text:line-break/><text:span text:style-name="T1"> </text:span><text:span text:style-name="T2">(43/18) </text:span> ⲁϥⲟⲩⲱⲛ ⲉⲛⲉϥⲙ〈ⲏ〉ⲣ〈ⲉ〉 [ⲛⲉⲛⲧⲁⲩ] <text:line-break/><text:span text:style-name="T1"> </text:span><text:span text:style-name="T2">(43/19) </text:span> ⲣ̅ⲧⲩⲡⲟⲩ ⲙ̅ⲡⲙⲁ ⲧⲏⲣ̣[ϥ̅ ⲁϥⲣ̅ⲕⲁ]‐ <text:line-break/><text:span text:style-name="T1"> </text:span><text:span text:style-name="T2">(43/20) </text:span> [ⲧⲁ]ⲕⲣⲓⲛⲉ [ⲙ̅]ⲙ̣ⲟⲟ[ⲩ· ⲛⲁⲓ̈ ⲇⲉ] <text:line-break/><text:span text:style-name="T1"> </text:span><text:span text:style-name="T2">(43/21) </text:span> [ⲙ̅ⲡⲟ]ⲩϭⲛ̅..[.....]ϥ ⲉ[ϥ]ϩ̣ⲏ̣ⲡ’̣ <text:line-break/><text:span text:style-name="T1"> </text:span><text:span text:style-name="T2">(43/22) </text:span> ⲙ̣̅ⲡⲉϥϩⲟⲩⲛ· ⲁ[ⲩⲱ ⲁϥϩⲓ ⲧⲟ]ⲟⲧϥ̅ <text:line-break/><text:span text:style-name="T1"> </text:span><text:span text:style-name="T2">(43/23) </text:span> ⲉⲣⲟϥ̓ ⲟⲩⲁⲁϥ ⲁϥⲣ̅ⲁ̣ⲣ̣[ⲭⲉⲥⲑ]ⲁ̣ⲓ̣ [ⲉⲣ̅]‐ <text:line-break/><text:span text:style-name="T1"> </text:span><text:span text:style-name="T2">(43/24) </text:span> ⲛⲟⲉⲓ ⲙ̅ⲙⲟϥ̣ [ⲟⲩⲁⲁϥ ⲁⲩⲱ] <text:line-break/><text:span text:style-name="T1"> </text:span><text:span text:style-name="T2">(43/25) </text:span> ⲉϣⲁϫⲉ ⲙⲛ̅ ⲡ̣ⲉϥ[ⲛ]ⲟ[ⲩⲥ ⲉⲧ]ⲉ̣ <text:line-break/><text:span text:style-name="T1"> </text:span><text:span text:style-name="T2">(43/26) </text:span> ⲡⲓⲱⲧ’ ⲛ̅ⲧⲙⲉ ⲡⲉ ⲉ[ⲧⲃⲉ] ⲛ̣̅ⲁⲓ̣ <text:line-break/><text:span text:style-name="T1"> </text:span><text:span text:style-name="T2">(43/27) </text:span> ⲱⲛ ⲛ̅ⲛⲁⲧ’ϫⲡⲟⲟⲩ· ⲁⲩ[ⲱ] ⲉⲧⲃⲉ <text:line-break/><text:span text:style-name="T1"> </text:span><text:span text:style-name="T2">(43/28) </text:span> ⲧⲡⲁⲣⲑⲉⲛⲟⲥ ⲧⲁⲓ̈ ⲛ̅ⲧⲁϩϫⲡⲉ̣ <text:line-break/><text:span text:style-name="T1"> </text:span><text:span text:style-name="T2">(43/29) </text:span> ⲡⲟⲩⲟⲉⲓⲛ· ⲁⲩⲱ ⲉϥⲙⲉⲉⲩⲉ <text:line-break/><text:span text:style-name="T1"> </text:span><text:span text:style-name="T2">(43/30) </text:span> ⲉⲧⲃⲉ ⲧⲇⲩⲛⲁⲙⲓⲥ ⲧⲁⲓ̈ [ⲛ̅ⲧⲁϩ] <text:line-break/><text:span text:style-name="T1"> </text:span><text:span text:style-name="T2">(43/31) </text:span> ϩⲉϯⲉ ⲉϫⲙ̅ ⲡⲙⲁ̣ [ⲧⲏⲣϥ̅·] <text:line-break/><text:span text:style-name="T1"> </text:span><text:span text:style-name="T2">(44/1) </text:span> ⲁⲩⲱ ⲉⲧⲉⲙⲁϩⲧⲉ ⲉϫⲱϥ· ⲁⲩⲱ <text:line-break/><text:span text:style-name="T1"> </text:span><text:span text:style-name="T2">(44/2) </text:span> ⲉϥⲟ ⲙ̅ⲙⲁⲑⲏⲧⲏⲥ ⲙ̅ⲡⲉϥⲛⲟⲩⲥ <text:line-break/><text:span text:style-name="T1"> </text:span><text:span text:style-name="T2">(44/3) </text:span> ⲡⲁⲓ̈ ⲉⲧⲟ ⲛ̅ϩⲟⲟⲩⲧ’· ⲁϥⲣ̅ⲁⲣⲭⲉⲥⲑⲁⲓ <text:line-break/><text:span text:style-name="T1"> </text:span><text:span text:style-name="T2">(44/4) </text:span> ⲉⲧⲣⲉϥⲕⲁⲣⲱϥ ⲛ̅ϩⲣⲁⲓ̈ ⲛ̅ϩⲏⲧϥ̅ ⲟⲩ‐ <text:line-break/><text:span text:style-name="T1"> </text:span><text:span text:style-name="T2">(44/5) </text:span> ⲁⲁϥ· ϣⲁϩⲟⲩⲛ ⲉⲡϩⲟⲟⲩ ⲉⲧⲉϥ‐ <text:line-break/><text:span text:style-name="T1"> </text:span><text:span text:style-name="T2">(44/6) </text:span> ⲛⲁⲣ̅ ⲁⲝⲓⲟⲥ ⲉⲧⲣⲉϫⲓⲧϥ̅ ⲉⲡⲥⲁⲛ <text:line-break/><text:span text:style-name="T1"> </text:span><text:span text:style-name="T2">(44/7) </text:span> ⲧⲡⲉ· ⲉϥⲧⲱϭⲉ ⲙ̅ⲙⲟϥ ⲉⲃⲟⲗ <text:line-break/><text:span text:style-name="T1"> </text:span><text:span text:style-name="T2">(44/8) </text:span> ⲛ̅ⲧⲙⲛ̅ⲧ’ϩⲁϩ ⲛ̅ϣⲁϫⲉ ⲙⲛ̅ ϩⲉⲛ‐ <text:line-break/><text:span text:style-name="T1"> </text:span><text:span text:style-name="T2">(44/9) </text:span> ϣⲁϫⲉ ⲙ̅ⲙⲓϣⲉ· ⲛ̅ϥϩⲩⲡⲟⲙⲓⲛⲉ <text:line-break/><text:span text:style-name="T1"> </text:span><text:span text:style-name="T2">(44/10) </text:span> ⲉϩⲣⲁⲓ̈ ϩⲁ ⲡⲙⲁ ⲧⲏⲣϥ̅· ⲁⲩⲱ ⲛ̅ϥϥⲓ <text:line-break/><text:span text:style-name="T1"> </text:span><text:span text:style-name="T2">(44/11) </text:span> ⲉϩⲣⲁ̣ⲓ̈ ϩⲁⲣⲟⲟⲩ· ⲁⲩⲱ ⲛ̅ϥⲣ̅ⲁⲛⲉ‐ <text:line-break/><text:span text:style-name="T1"> </text:span><text:span text:style-name="T2">(44/12) </text:span> ⲭⲉⲥⲑⲁⲓ ⲛ̅ϩⲏⲧⲟⲩ ⲛ̅ⲛⲙ̅ⲡⲉⲑⲟⲟⲩ <text:line-break/><text:span text:style-name="T1"> </text:span><text:span text:style-name="T2">(44/13) </text:span> ⲧⲏⲣⲟⲩ· ⲁⲩⲱ ϥⲟ ⲛ̅ϩⲁⲣϣ̅ϩⲏⲧ’ <text:line-break/><text:span text:style-name="T1"> </text:span><text:span text:style-name="T2">(44/14) </text:span> ⲉϫⲛ̅ ⲟⲩⲟⲛ ⲛⲓⲙ· ϥⲧⲁⲛⲧⲛ̅ ⲙ̅ⲙⲟϥ <text:line-break/><text:soft-page-break/><text:span text:style-name="T1"> </text:span><text:span text:style-name="T2">(44/15) </text:span> ⲉⲟⲩⲟⲛ ⲛⲓⲙ̓ ⲁⲩⲱ ϥⲡⲱⲣϫ̅ ⲟⲛ ⲙ̅‐ <text:line-break/><text:span text:style-name="T1"> </text:span><text:span text:style-name="T2">(44/16) </text:span> ⲙⲟϥ̣ ⲉⲣ̣ⲟⲟⲩ· ⲁⲩⲱ ⲡⲉⲧϥ̅ⲟⲩⲁ‐ <text:line-break/><text:span text:style-name="T1"> </text:span><text:span text:style-name="T2">(44/17) </text:span> ϣ̣[ϥ̅ ϥⲓⲛ]ⲉ ⲙ̅ⲙⲟϥ ⲉϩⲟⲩⲛ ⲉⲣⲟϥ· <text:line-break/><text:span text:style-name="T1"> </text:span><text:span text:style-name="T2">(44/18) </text:span> [ϫⲉⲕⲁⲁⲥ] ⲉϥⲛⲁϣⲱⲡⲉ ⲛ̅ⲧⲉⲗⲉⲓ‐ <text:line-break/><text:span text:style-name="T1"> </text:span><text:span text:style-name="T2">(44/19) </text:span> [ⲟⲥ ⲉϥⲟⲩⲁ]ⲁⲃ· ⲉⲛ̣ⲧ̣ⲁⲣⲉ̣ⲡ[ <text:line-break/><text:span text:style-name="T1"> </text:span><text:span text:style-name="T2">(44/20) </text:span> [...]..[.....]ⲁ̣ⲩⲛⲁϣ̣[.. ⲁϥⲁ]‐ <text:line-break/><text:span text:style-name="T1"> </text:span><text:span text:style-name="T2">(44/21) </text:span> ⲙⲁϩⲧⲉ [ⲙ̅ⲙⲟϥ] ⲉⲁϥⲙⲟⲩⲣ ⲙ̅ⲙⲟϥ <text:line-break/><text:span text:style-name="T1"> </text:span><text:span text:style-name="T2">(44/22) </text:span> ⲉϫⲛ̅ [....].[.] ⲁⲩⲱ ⲁϥⲙⲟⲩϩ <text:line-break/><text:span text:style-name="T1"> </text:span><text:span text:style-name="T2">(44/23) </text:span> [ⲛ̅ⲧⲥⲟⲫⲓⲁ·] ⲁ̣[ϥⲣ̅] ⲙ̣ⲛ̣̅ⲧⲣⲉ ϩⲁ ⲧⲙⲉ· <text:line-break/><text:span text:style-name="T1"> </text:span><text:span text:style-name="T2">(44/24) </text:span> [....]ⲧⲉ [ⲧ]ⲇⲩⲛ[ⲁ]ⲙⲓⲥ ⲛ̅ϥⲃⲱⲕ <text:line-break/><text:span text:style-name="T1"> </text:span><text:span text:style-name="T2">(44/25) </text:span> [ⲉ]ϩⲣ[ⲁⲓ̈ ϩⲛ̅] ⲧⲙⲛ̅ⲧ’ⲁⲧ’ⲧⲉⲕⲟ ⲡⲙⲁ <text:line-break/><text:span text:style-name="T1"> </text:span><text:span text:style-name="T2">(44/26) </text:span> ⲛ̅ⲧⲁ[ϥ{ⲉ̅ⲓ}] ⲉⲃⲟⲗ ⲙ̅ⲙⲁⲩ ⲉⲁϥⲕⲱ ⲛ̅‐ <text:line-break/><text:span text:style-name="T1"> </text:span><text:span text:style-name="T2">(44/27) </text:span> ⲥⲱϥ ⲙ̅ⲡⲕⲟⲥⲙⲟⲥ ⲉⲧⲉ ⲟⲩⲛ̅‐ <text:line-break/><text:span text:style-name="T1"> </text:span><text:span text:style-name="T2">(44/28) </text:span> ⲧ̣ⲁϥ ⲙ̅ⲙⲁⲩ ⲙ̅ⲡⲓⲛⲉ ⲛ̅ⲧⲉⲩ‐ <text:line-break/><text:span text:style-name="T1"> </text:span><text:span text:style-name="T2">(44/29) </text:span> [ϣⲏ ⲙⲛ̅] ⲛⲉⲧ’ⲥⲕⲣ̅ⲕⲣ̅ ⲛ̅‐ <text:line-break/><text:span text:style-name="T1"> </text:span><text:span text:style-name="T2">(44/30) </text:span> [ⲛ̅ⲥⲓⲟⲩ ⲛ̅ϩⲏ]ⲧ̣ϥ̅· ⲧⲁⲓ̈ ϭⲉ ⲧⲉ <text:line-break/><text:span text:style-name="T1"> </text:span><text:span text:style-name="T2">(45/1) </text:span> ⲧ̣ⲙⲁⲣⲧⲩⲣⲓⲁ ⲙ̅ⲙⲉ· ϩⲟⲧⲁⲛ ⲉⲣ‐ <text:line-break/><text:span text:style-name="T1"> </text:span><text:span text:style-name="T2">(45/2) </text:span> ϣⲁⲛⲡⲣⲱⲙⲉ ⲥⲟⲩⲱⲛϥ̅ ⲟⲩⲁⲁϥ <text:line-break/><text:span text:style-name="T1"> </text:span><text:span text:style-name="T2">(45/3) </text:span> ⲙⲛ̅ ⲡⲛⲟⲩⲧⲉ ⲉⲧ’ϩⲓ̅ϫⲛ̅ ⲧⲙⲉ· <text:line-break/><text:span text:style-name="T1"> </text:span><text:span text:style-name="T2">(45/4) </text:span> ⲡⲁⲓ̈ ⲇⲉ ⲛⲁⲟⲩϫⲁⲓ̈· ⲁⲩⲱ ⲛ̅ϥⲣ̅‐ <text:line-break/><text:span text:style-name="T1"> </text:span><text:span text:style-name="T2">(45/5) </text:span> ⲥⲧⲉⲫⲁⲛⲟⲩ ⲙ̅ⲙⲟϥ ⲙ̅ⲡⲕⲗⲟⲙ <text:line-break/><text:span text:style-name="T1"> </text:span><text:span text:style-name="T2">(45/6) </text:span> ⲛ̅ⲁⲧ’ϩⲱⲕⲙ̅· ⲓ̈ⲱϩⲁⲛⲛⲏⲥ ⲛ̅‐ <text:line-break/><text:span text:style-name="T1"> </text:span><text:span text:style-name="T2">(45/7) </text:span> ⲧⲁⲩϫⲡⲟϥ ϩⲙ̅ ⲡϣⲁϫⲉ ϩⲓ̅ⲧⲛ̅ <text:line-break/><text:span text:style-name="T1"> </text:span><text:span text:style-name="T2">(45/8) </text:span> ⲟⲩⲥϩⲓ̅ⲙⲉ ϫⲉ ⲉⲗⲓⲥⲁⲃⲉⲧ’· <text:line-break/><text:span text:style-name="T1"> </text:span><text:span text:style-name="T2">(45/9) </text:span> ⲁⲩⲱ ⲡⲉⲭ̅ⲥ̅ ⲛ̅ⲧⲁⲩϫⲡⲟϥ ϩⲙ̅ <text:line-break/><text:span text:style-name="T1"> </text:span><text:span text:style-name="T2">(45/10) </text:span> ⲡϣⲁϫⲉ ϩⲓⲧⲛ̅ ⲟⲩ →ⲡⲁⲣⲑⲉⲛⲟⲥ← ϫⲉ <text:line-break/><text:span text:style-name="T1"> </text:span><text:span text:style-name="T2">(45/11) </text:span> ⲙⲁⲣⲓⲁ· ⲟⲩⲟⲩ ⲡⲉ ⲡⲉⲓ̈ⲙⲩ‐ <text:line-break/><text:span text:style-name="T1"> </text:span><text:span text:style-name="T2">(45/12) </text:span> ⲥⲧⲏⲣⲓⲟⲛ ϫⲉ ⲓ̈ⲱϩⲁⲛⲛⲏⲥ ⲛ̅‐ <text:line-break/><text:span text:style-name="T1"> </text:span><text:span text:style-name="T2">(45/13) </text:span> ⲧⲁⲩϫⲡⲟϥ ϩⲓ̅ⲧⲛ̅ ⲟⲩⲁⲧⲉ ⲉⲁⲥ‐ <text:line-break/><text:span text:style-name="T1"> </text:span><text:span text:style-name="T2">(45/14) </text:span> ϩⲓ̅ⲧⲉ ⲉⲁⲥⲣ̅ ϩⲗ̅ⲗⲱ· ⲡⲉⲭ̅ⲥ̅ ⲇⲉ <text:line-break/><text:span text:style-name="T1"> </text:span><text:span text:style-name="T2">(45/15) </text:span> ⲁϥϫⲱⲃⲉ ⲛ̅ⲟⲩⲁⲧⲉ ⲙ̅ⲡⲁⲣⲑⲉ‐ <text:line-break/><text:span text:style-name="T1"> </text:span><text:span text:style-name="T2">(45/16) </text:span> ⲛⲟⲥ· ⲛ̅ⲧⲁⲣⲉⲥⲱ͂ ⲇⲉ ⲁⲥϫⲡⲟ <text:line-break/><text:span text:style-name="T1"> </text:span><text:span text:style-name="T2">(45/17) </text:span> ⲙ̅ⲡⲥⲱⲧⲏⲣ̓ ⲡⲁⲗⲓⲛ ⲁⲩϩ̣ⲉ ⲉ‐ <text:line-break/><text:span text:style-name="T1"> </text:span><text:span text:style-name="T2">(45/18) </text:span> ⲣⲟⲥ ⲟⲛ ⲉⲥⲉ⟦ⲉ⟧ ⲙ̅ⲡⲁⲣⲑ[ⲉⲛⲟⲥ] <text:line-break/><text:span text:style-name="T1"> </text:span><text:span text:style-name="T2">(45/19) </text:span> ⲉⲧⲃⲉ ⲟⲩ ϭⲉ ⲧⲉⲧ[ⲛ̅]ⲣ̣̅[ⲡⲗⲁⲛⲁ] <text:line-break/><text:span text:style-name="T1"> </text:span><text:span text:style-name="T2">(45/20) </text:span> ⲧ̣ⲉ̣ⲧⲛ̅ϣⲓⲛⲉ ⲁ̣ⲛ ⲛ̅ⲥⲁ ⲛⲓⲙⲩ‐ <text:line-break/><text:span text:style-name="T1"> </text:span><text:span text:style-name="T2">(45/21) </text:span> ⲥⲧⲏⲣⲓⲟⲛ ⲛⲁⲓ̈ ⲛ̣̅ⲧ̣ⲁⲩⲣ̅ ϣⲣ̅ⲡ’ ⲛ̅‐ <text:line-break/><text:span text:style-name="T1"> </text:span><text:span text:style-name="T2">(45/22) </text:span> ⲧⲩⲡⲟⲩ ⲙ̅ⲙⲟ[ⲟ]ⲩ ⲉⲧ’[ⲃ]ⲏⲏ̣ⲧⲛ̅· <text:line-break/><text:span text:style-name="T1"> </text:span><text:span text:style-name="T2">(45/23) </text:span> ϥⲥⲏϩ ϩⲙ̅ ⲡⲛⲟⲙⲟⲥ ⲉⲧⲃⲉ ⲡ̣[ⲁⲓ̈] <text:line-break/><text:span text:style-name="T1"> </text:span><text:span text:style-name="T2">(45/24) </text:span> ⲛ̅ⲧⲁⲣⲉⲡⲛⲟ̣[ⲩ]ⲧ̣ⲉ ϯ ⲉⲧ̣ⲟ̣[ⲟⲧϥ̅] <text:line-break/><text:span text:style-name="T1"> </text:span><text:span text:style-name="T2">(45/25) </text:span> ⲛ̅ⲛⲁⲇⲁⲙ [ϫ]ⲉ̣ ⲉⲃⲟⲗ ϩ[ⲛ̅ ϣⲏ]ⲛ <text:line-break/><text:span text:style-name="T1"> </text:span><text:span text:style-name="T2">(45/26) </text:span> ⲛⲓⲙ ⲉⲕⲁⲟⲩⲱⲙ· ⲉⲃ[ⲟⲗ ⲇ]ⲉ <text:line-break/><text:span text:style-name="T1"> </text:span><text:span text:style-name="T2">(45/27) </text:span> ϩⲙ̅ ⲡϣⲏⲛ ⲉⲧ’ϩⲛ̅ ⲧⲙⲏⲧⲉ ⲙ̅ⲡ’‐ <text:line-break/><text:span text:style-name="T1"> </text:span><text:span text:style-name="T2">(45/28) </text:span> ⲡⲁⲣⲁⲇⲉⲓⲥⲟⲥ ⲙ̅ⲡⲣ̅ⲟⲩⲱⲙ· <text:line-break/><text:span text:style-name="T1"> </text:span><text:span text:style-name="T2">(45/29) </text:span> ϫⲉ ϩⲙ̅ ⲫⲟⲟⲩ ⲉⲧⲕ̅ⲛⲁⲟⲩⲱⲙ <text:line-break/><text:span text:style-name="T1"> </text:span><text:span text:style-name="T2">(45/30) </text:span> ⲉⲃⲟⲗ ⲛ̅ϩⲏⲧϥ̅ ϩⲛ̅ ⲟⲩⲙⲟⲩ ⲕⲛⲁ̣‐ <text:line-break/><text:span text:style-name="T1"> </text:span><text:span text:style-name="T2">(45/31) </text:span> ⲙⲟⲩ· ⲫⲟϥ ⲇⲉ ⲛⲉ ⲟⲩⲥⲁⲃⲉ ⲡ̣[ⲉ] <text:line-break/><text:soft-page-break/><text:span text:style-name="T1"> </text:span><text:span text:style-name="T2">(46/1) </text:span> ⲡⲁⲣⲁ ⲛ̅ⲍⲱⲟⲛ ⲧⲏⲣⲟⲩ ⲉⲧ’ <text:line-break/><text:span text:style-name="T1"> </text:span><text:span text:style-name="T2">(46/2) </text:span> ϩⲙ̅ ⲡ’ⲡⲁⲣⲁⲇⲉⲓⲥⲟⲥ· ⲁⲩⲱ <text:line-break/><text:span text:style-name="T1"> </text:span><text:span text:style-name="T2">(46/3) </text:span> ⲁϥⲣ̅ⲡⲓⲑⲉ ⲛ̅ⲉⲩϩⲁ ⲉϥϫⲱ ⲙ̅ⲙⲟⲥ <text:line-break/><text:span text:style-name="T1"> </text:span><text:span text:style-name="T2">(46/4) </text:span> ϫⲉ ϩⲙ̅ ⲫⲟⲟⲩ ⲉⲧⲉⲧⲛⲁⲟⲩⲱⲙ <text:line-break/><text:span text:style-name="T1"> </text:span><text:span text:style-name="T2">(46/5) </text:span> ⲉⲃⲟⲗ ϩⲙ̅ ⲡϣⲏⲛ ⲉⲧ’ϩⲛ̅ ⲧⲙⲏ‐ <text:line-break/><text:span text:style-name="T1"> </text:span><text:span text:style-name="T2">(46/6) </text:span> ⲧⲉ ⲙ̅ⲡ’ⲡⲁⲣⲁⲇⲉⲓⲥⲟⲥ ⲥⲉⲛⲁ‐ <text:line-break/><text:span text:style-name="T1"> </text:span><text:span text:style-name="T2">(46/7) </text:span> ⲟⲩⲉⲛ ⲛ̅ϭⲓ ⲛ̅ⲃⲁⲗ ⲙ̅ⲡⲉⲧⲛ̅ <text:line-break/><text:span text:style-name="T1"> </text:span><text:span text:style-name="T2">(46/8) </text:span> ϩⲏⲧ’· ⲁⲉⲩϩⲁ ⲇⲉ ⲁⲥⲡⲓⲑⲉ <text:line-break/><text:span text:style-name="T1"> </text:span><text:span text:style-name="T2">(46/9) </text:span> ⲁⲩⲱ ⲁⲥⲥⲱⲧ’ ⲛ̅ⲧⲉⲥϭⲓϫ ⲉⲃⲟⲗ <text:line-break/><text:span text:style-name="T1"> </text:span><text:span text:style-name="T2">(46/10) </text:span> ⲁⲥϫⲓ ⲉⲃⲟⲗ ϩⲙ̅ ⲡϣⲏⲛ ⲁⲥⲟⲩ‐ <text:line-break/><text:span text:style-name="T1"> </text:span><text:span text:style-name="T2">(46/11) </text:span> ⲱⲙ ⲁⲥϯ ⲙ̅ⲡⲉⲥⲕⲉϩⲁⲓ̈ ⲛⲙ̅‐ <text:line-break/><text:span text:style-name="T1"> </text:span><text:span text:style-name="T2">(46/12) </text:span> ⲙⲁⲥ· ⲁⲩⲱ ⲛ̅ⲧⲉⲩⲛⲟⲩ ⲁⲩⲙ̅ <text:line-break/><text:span text:style-name="T1"> </text:span><text:span text:style-name="T2">(46/13) </text:span> ⲙⲉ ϫⲉ ⲛⲉⲩⲕⲏⲕ ⲁϩⲏⲟⲩ ⲡⲉ· <text:line-break/><text:span text:style-name="T1"> </text:span><text:span text:style-name="T2">(46/14) </text:span> ⲁⲩⲱ ⲁⲩϫⲓ ⲛ̅ϩⲉⲛϭⲱⲃⲉ ⲛ̅ⲕⲛ̅ⲧⲉ <text:line-break/><text:span text:style-name="T1"> </text:span><text:span text:style-name="T2">(46/15) </text:span> ⲁⲩⲧⲁⲁⲩ ϩⲓ̅ⲱⲟⲩ ⲛ̅ⲁⲕⲏⲥ· ⲁ‐ <text:line-break/><text:span text:style-name="T1"> </text:span><text:span text:style-name="T2">(46/16) </text:span> ⲡⲛ̣[ⲟ]ⲩⲧⲉ ⲇⲉ {ⲉ̅ⲓ̣̅} ⲙ̅ⲡⲛⲁⲩ ⲛ̅‐ <text:line-break/><text:span text:style-name="T1"> </text:span><text:span text:style-name="T2">(46/17) </text:span> [ⲣⲟⲩϩⲉ] ⲉϥ̣ⲥⲛⲁⲉⲓⲛ ⲛ̅ⲧⲙⲏⲧⲉ <text:line-break/><text:span text:style-name="T1"> </text:span><text:span text:style-name="T2">(46/18) </text:span> [ⲙ̅ⲡ’ⲡ]ⲁ̣ⲣⲁⲇⲉⲓⲥⲟⲥ· ⲛ̅ⲧⲁⲣⲉ <text:line-break/><text:span text:style-name="T1"> </text:span><text:span text:style-name="T2">(46/19) </text:span> ⲁⲇⲁⲙ ⲇⲉ ⲛⲁ̣ⲩ ⲉⲣⲟϥ ⲁϥⲕⲱⲡ’ <text:line-break/><text:span text:style-name="T1"> </text:span><text:span text:style-name="T2">(46/20) </text:span> ⲁⲩⲱ ⲡⲉϫⲁϥ̣ ϫⲉ ⲁⲇⲁⲙ ⲉⲕⲧⲱⲛ· <text:line-break/><text:span text:style-name="T1"> </text:span><text:span text:style-name="T2">(46/21) </text:span> [ⲛ̅ⲧ]ⲟϥ ⲇⲉ ⲁϥⲟⲩⲱϣⲃ̅ ⲡⲉϫ̣ⲁϥ <text:line-break/><text:span text:style-name="T1"> </text:span><text:span text:style-name="T2">(46/22) </text:span> [ϫⲉ ⲁⲓ̈]{ⲉ̣̅̅ⲓ̣̅} ϩ̣ⲁ ⲧⲃⲱ̣ ⲛ̣̅ⲕⲛ̅ⲧⲉ· <text:line-break/><text:span text:style-name="T1"> </text:span><text:span text:style-name="T2">(46/23) </text:span> ⲁⲩ[ⲱ ⲛ̅]ⲧ̣ⲉⲩⲛⲟⲩ [ⲉ]ⲧⲙ̅ⲙⲁⲩ <text:line-break/><text:span text:style-name="T1"> </text:span><text:span text:style-name="T2">(46/24) </text:span> ⲁϥⲉ[ⲓⲙ]ⲉ̣ ⲛ̅ϭⲓ ⲡⲛⲟⲩⲧⲉ ϫⲉ ⲁϥ‐ <text:line-break/><text:span text:style-name="T1"> </text:span><text:span text:style-name="T2">(46/25) </text:span> ⲟⲩⲱⲙ̓ ⲉⲃⲟⲗ ϩⲙ̅ ⲡϣⲏⲛ ⲡⲁⲓ̈ <text:line-break/><text:span text:style-name="T1"> </text:span><text:span text:style-name="T2">(46/26) </text:span> ⲛ̅ⲧⲁϥϩⲱⲛ ⲉⲧⲟⲟⲧϥ̅ ϫⲉ ⲙ̅ⲡⲣ̅‐ <text:line-break/><text:span text:style-name="T1"> </text:span><text:span text:style-name="T2">(46/27) </text:span> ⲟⲩⲱⲙ ⲉⲃⲟⲗ ⲛ̅ϩⲏⲧϥ̅· ⲁⲩⲱ <text:line-break/><text:span text:style-name="T1"> </text:span><text:span text:style-name="T2">(46/28) </text:span> ⲡⲉϫⲁϥ ⲛⲁϥ ϫⲉ ⲛⲓⲙ ⲡⲉ ⲛ̅‐ <text:line-break/><text:span text:style-name="T1"> </text:span><text:span text:style-name="T2">(47/1) </text:span> [ⲧ]ⲁϩⲧⲥⲉⲃⲟⲕ· ⲁϥⲟⲩⲱϣⲃ̅ ⲇⲉ <text:line-break/><text:span text:style-name="T1"> </text:span><text:span text:style-name="T2">(47/2) </text:span> ⲛ̅ϭⲓ ⲁⲇⲁⲙ ϫⲉ ⲧⲥϩⲓ̅ⲙⲉ ⲉⲛⲧⲁⲕ <text:line-break/><text:span text:style-name="T1"> </text:span><text:span text:style-name="T2">(47/3) </text:span> ⲧⲁⲁⲥ ⲛⲁⲓ̈· ⲁⲩⲱ ⲡⲉϫⲉ ⲧⲥϩⲓ̅ⲙⲉ <text:line-break/><text:span text:style-name="T1"> </text:span><text:span text:style-name="T2">(47/4) </text:span> ϫⲉ ⲫⲟϥ ⲡⲉⲛⲧⲁϩⲧⲥⲁⲃⲟⲉⲓ· <text:line-break/><text:span text:style-name="T1"> </text:span><text:span text:style-name="T2">(47/5) </text:span> ⲁⲩⲱ ⲁϥⲥϩⲟⲩⲱⲣ ⲡϩⲟϥ̓ ⲁⲩⲱ <text:line-break/><text:span text:style-name="T1"> </text:span><text:span text:style-name="T2">(47/6) </text:span> ⲁϥⲙⲟⲩⲧⲉ ⲉⲣⲟϥ ϫⲉ ⲇⲓⲁⲃⲟⲗⲟⲥ· <text:line-break/><text:span text:style-name="T1"> </text:span><text:span text:style-name="T2">(47/7) </text:span> ⲁⲩⲱ ⲡⲉϫⲁϥ ϫⲉ ⲉⲓⲥ ⲁⲇⲁⲙ ⲁϥ‐ <text:line-break/><text:span text:style-name="T1"> </text:span><text:span text:style-name="T2">(47/8) </text:span> ϣⲱⲡⲉ ⲛ̅ⲑⲉ ⲛ̅ⲟⲩⲁ ⲙ̅ⲙⲟⲛ ⲉⲧⲣⲉϥ <text:line-break/><text:span text:style-name="T1"> </text:span><text:span text:style-name="T2">(47/9) </text:span> ⲙ̅ⲙⲉ ⲉⲡ’ⲡⲉⲑⲟⲟⲩ ⲙⲛ̅ ⲡ̅’ⲡⲉⲧ’‐ <text:line-break/><text:span text:style-name="T1"> </text:span><text:span text:style-name="T2">(47/10) </text:span> ⲛⲁⲛⲟⲩϥ· ⲡⲉϫⲁϥ ϭⲉ ϫⲉ ⲙⲁⲣⲛ̅‐ <text:line-break/><text:span text:style-name="T1"> </text:span><text:span text:style-name="T2">(47/11) </text:span> ⲛⲟϫϥ̅ ⲉⲃⲟⲗ ϩⲙ̅ ⲡ’ⲡⲁⲣⲁⲇⲉⲓⲥⲟⲥ <text:line-break/><text:span text:style-name="T1"> </text:span><text:span text:style-name="T2">(47/12) </text:span> ⲙⲏⲡⲟⲧⲉ ⲛ̅ϥϫⲓ ⲉⲃⲟⲗ ϩⲙ̅ ⲡϣⲏⲛ <text:line-break/><text:span text:style-name="T1"> </text:span><text:span text:style-name="T2">(47/13) </text:span> ⲙ̅ⲡⲱⲛϩ̅ ⲛ̅ϥⲟⲩⲱⲙ̓ ⲛ̅ϥⲱⲛϩ̅ ϣ̣ⲁ <text:line-break/><text:span text:style-name="T1"> </text:span><text:span text:style-name="T2">(47/14) </text:span> ⲉⲛⲉϩ· ⲟⲩⲁϣ ⲙ̅ⲙⲓⲛⲉ ⲛ̅ⲧⲟ̣ϥ <text:line-break/><text:span text:style-name="T1"> </text:span><text:span text:style-name="T2">(47/15) </text:span> ⲡⲉ ⲡⲓⲛⲟⲩⲧⲉ· ϣⲟⲣⲡ̅’ ⲙ[ⲉ]ⲛ̣ ⲁ̣[ϥ]‐ <text:line-break/><text:span text:style-name="T1"> </text:span><text:span text:style-name="T2">(47/16) </text:span> ⲣ̅ⲫⲑⲟⲛⲓ ⲉⲁⲇⲁⲙ ⲉⲧⲣⲉϥⲟ̣[ⲩ]‐ <text:line-break/><text:span text:style-name="T1"> </text:span><text:span text:style-name="T2">(47/17) </text:span> ⲱⲙ ⲉⲃⲟⲗ ϩⲙ̅ ⲡϣⲏⲛ ⲛ̅ⲧⲅ̣[ⲛⲱ]‐ <text:line-break/><text:span text:style-name="T1"> </text:span><text:span text:style-name="T2">(47/18) </text:span> ⲥⲉⲱⲥ· ⲁⲩⲱ ⲡⲙⲉϩⲥⲛⲁⲩ <text:line-break/><text:span text:style-name="T1"> </text:span><text:span text:style-name="T2">(47/19) </text:span> ⲡⲉϫⲁϥ ϫⲉ· ⲁⲇⲁⲙ ⲉⲕⲧⲱⲛ· <text:line-break/><text:soft-page-break/><text:span text:style-name="T1"> </text:span><text:span text:style-name="T2">(47/20) </text:span> ⲡⲛⲟⲩⲧⲉ ⲇⲉ ⲙ̣[ⲛ̅]ⲧⲁϥ ⲙ̅ⲙⲁⲩ <text:line-break/><text:span text:style-name="T1"> </text:span><text:span text:style-name="T2">(47/21) </text:span> ⲛ̅ⲧⲡⲣ̣ⲟ〈ⲅ〉ⲛⲱⲥⲓⲥ ⲉⲧⲉ ⲡⲁⲓ̈ ⲡⲉ‐ <text:line-break/><text:span text:style-name="T1"> </text:span><text:span text:style-name="T2">(47/22) </text:span> ϫⲉ ⲡ̣ⲏ̣ ⲉϥ̣ⲥⲟⲟⲩⲛ ⲁⲛ ϫⲓ̣ⲛ̣ ⲛ̣̅‐ <text:line-break/><text:span text:style-name="T1"> </text:span><text:span text:style-name="T2">(47/23) </text:span> ϣⲟⲣⲡ’· ⲁ[ⲩⲱ] ⲙⲛ̣̅ⲛ̅ⲥⲱⲥ̣ [ⲡⲉ]‐ <text:line-break/><text:span text:style-name="T1"> </text:span><text:span text:style-name="T2">(47/24) </text:span> ϫⲁ̣ϥ̣ ϫ̣ⲉ [ⲙⲁ]ⲣⲛ̅ⲛⲟϫϥ̣̅ [ⲉⲃⲟⲗ] <text:line-break/><text:span text:style-name="T1"> </text:span><text:span text:style-name="T2">(47/25) </text:span> ⲙ̅ⲡ[ⲉ]ⲓ̈ⲙⲁ· ϫⲉⲕⲁⲁⲥ ⲉ̣[ⲛ]ⲉ̣ϥ̣ <text:line-break/><text:span text:style-name="T1"> </text:span><text:span text:style-name="T2">(47/26) </text:span> ⲟⲩⲱⲙ ⲉⲃⲟⲗ ⲙ̅ⲡϣⲏⲛ ⲙ̅‐ <text:line-break/><text:span text:style-name="T1"> </text:span><text:span text:style-name="T2">(47/27) </text:span> ⲡⲱⲛϩ̅ ⲛ̅ϥⲱⲛϩ̅ ϣⲁ ⲉⲛⲉϩ· <text:line-break/><text:span text:style-name="T1"> </text:span><text:span text:style-name="T2">(47/28) </text:span> ⲉϣϫⲉ ⲁϥϭⲟⲗⲡϥ̅ ⲇⲉ ⲉⲃⲟⲗ <text:line-break/><text:span text:style-name="T1"> </text:span><text:span text:style-name="T2">(47/29) </text:span> ⲟⲩⲁⲁϥ ϫⲉ ⲟⲩⲃⲁⲥⲕⲁⲛⲟⲥ <text:line-break/><text:span text:style-name="T1"> </text:span><text:span text:style-name="T2">(47/30) </text:span> ⲡⲉ ⲛ̅ⲣⲉϥⲫⲑⲟⲛⲉⲓ· ⲁⲩⲱ <text:line-break/><text:span text:style-name="T1"> </text:span><text:span text:style-name="T2">(48/1) </text:span> ⲡⲁⲓ̈ ⲟⲩⲛⲟⲩⲧⲉ ⲡⲉ ⲛ̅ⲁϣ ⲙ̅‐ <text:line-break/><text:span text:style-name="T1"> </text:span><text:span text:style-name="T2">(48/2) </text:span> ⲙⲓⲛⲉ ⲡⲉ· ⲛⲁϣⲉ ⲧⲙⲛ̅ⲧ’ⲃⲗ̅ⲗⲉ̣ <text:line-break/><text:span text:style-name="T1"> </text:span><text:span text:style-name="T2">(48/3) </text:span> ⲅⲁⲣ ⲛ̅ⲛⲉⲧⲱϣ ⲁⲩⲱ ⲙ̅ⲡⲟⲩⲥⲟⲩ <text:line-break/><text:span text:style-name="T1"> </text:span><text:span text:style-name="T2">(48/4) </text:span> ⲱⲛϥ̅· ⲁⲩⲱ ⲡⲉϫⲁϥ ϫⲉ ⲁⲛⲟⲕ ⲡⲉ <text:line-break/><text:span text:style-name="T1"> </text:span><text:span text:style-name="T2">(48/5) </text:span> ⲡⲛⲟⲩⲧⲉ ⲛ̅ⲣⲉϥⲕⲱϩ· ϯⲛⲁⲉⲓⲛⲉ <text:line-break/><text:span text:style-name="T1"> </text:span><text:span text:style-name="T2">(48/6) </text:span> ⲛ̅ⲛ̅ⲛⲟⲃⲉ ⲛ̅ⲛ̅ⲉⲓⲟⲧⲉ ⲉϩⲣⲁⲓ̈ ⲉϫⲛ̅ <text:line-break/><text:span text:style-name="T1"> </text:span><text:span text:style-name="T2">(48/7) </text:span> ⲛ̅ϣⲏⲣⲉ ϣⲁ ϣⲟⲙⲧⲉ ϥⲧⲟ ⲛ̅ⲅⲉ‐ <text:line-break/><text:span text:style-name="T1"> </text:span><text:span text:style-name="T2">(48/8) </text:span> ⲛⲉⲁ· ⲁⲩⲱ ⲡⲉϫⲁϥ ϫⲉ ϯⲛⲁⲧⲣⲉ <text:line-break/><text:span text:style-name="T1"> </text:span><text:span text:style-name="T2">(48/9) </text:span> ⲡⲟⲩϩⲏⲧ’ ⲟⲩⲙⲟⲧ’· ⲁⲩⲱ ⲛ̅ⲧⲁ <text:line-break/><text:span text:style-name="T1"> </text:span><text:span text:style-name="T2">(48/10) </text:span> ⲧⲣⲉⲡⲟⲩⲛⲟⲩⲥ ⲣ̅ ⲃⲗ̅ⲗⲉ ϫⲉⲕⲁ‐ <text:line-break/><text:span text:style-name="T1"> </text:span><text:span text:style-name="T2">(48/11) </text:span> ⲁⲥ ⲉⲛⲟⲩⲣ̅ⲛⲟⲉⲓ ⲟⲩⲇⲉ ⲛ̅ⲛⲟⲩ <text:line-break/><text:span text:style-name="T1"> </text:span><text:span text:style-name="T2">(48/12) </text:span> ⲣ̅ⲕⲁⲧⲁⲗⲁⲙⲃⲁⲛⲉ· ⲛ̅ⲛⲉⲧⲟⲩ <text:line-break/><text:span text:style-name="T1"> </text:span><text:span text:style-name="T2">(48/13) </text:span> ϫⲱ ⲙ̅ⲙⲟⲟⲩ· ⲁⲗⲗⲁ ⲛⲁⲓ̈ ⲛ̅ⲧⲁϥ <text:line-break/><text:span text:style-name="T1"> </text:span><text:span text:style-name="T2">(48/14) </text:span> ϫⲟⲟⲩ ⲛ̅ⲛⲉⲧⲣ̅ⲡⲓⲥⲧⲉⲩⲉ ⲉⲣⲟϥ <text:line-break/><text:span text:style-name="T1"> </text:span><text:span text:style-name="T2">(48/15) </text:span> [ⲁ]ⲩ̣[ⲱ] ⲉⲧ’ϣⲙ̅ϣⲉ ⲛⲁϥ· ⲁⲩⲱ <text:line-break/><text:span text:style-name="T1"> </text:span><text:span text:style-name="T2">(48/16) </text:span> [ϩ]ⲛ̣̅ 〈ⲟⲩ〉ⲙⲁ ⲉϥⲥϩⲁⲓ̈ ⲛ̅ϭⲓ ⲙⲱⲩⲥⲏⲥ <text:line-break/><text:span text:style-name="T1"> </text:span><text:span text:style-name="T2">(48/17) </text:span> [ⲁϥ]ⲉⲓⲣⲉ ⲙ̅ⲡⲇⲓⲁⲃⲟⲗⲟⲥ ⲛ̅ϩⲟϥ· <text:line-break/><text:span text:style-name="T1"> </text:span><text:span text:style-name="T2">(48/18) </text:span> 〈ⲛ̅〉[ⲛⲉ]ⲧⲉ ⲟⲩⲛ̅ⲧⲁϥⲥⲉ̣ ϩⲙ̣̅ ⲡⲉϥϫⲡⲟ‐ <text:line-break/><text:span text:style-name="T1"> </text:span><text:span text:style-name="T2">(48/19) </text:span> [ϩ]ⲙ̣̅ ⲡⲕⲉϫⲱⲱⲙⲉ ⲧⲁⲓ̈ ⲉⲧⲟⲩ <text:line-break/><text:span text:style-name="T1"> </text:span><text:span text:style-name="T2">(48/20) </text:span> ⲙⲟⲩⲧⲉ ⲉⲣⲟⲥ ϫⲉ ⲧⲉ̣ⲝⲟⲇⲟⲥ· <text:line-break/><text:span text:style-name="T1"> </text:span><text:span text:style-name="T2">(48/21) </text:span> ⲉϥⲥⲏϩ ⲛ̅ⲧⲉⲓ̈ϩⲉ ϫⲉ ⲁϥϯ ⲉϩⲛ̣̅ ⲙ̅‐ <text:line-break/><text:span text:style-name="T1"> </text:span><text:span text:style-name="T2">(48/22) </text:span> ⲙ̣[ⲁⲅⲟ]ⲥ· ⲛ̅ⲧⲁ̣ⲣ̣ⲉ̣[ⲡ]ⲙⲁ ⲙ̣ⲟⲩϩ <text:line-break/><text:span text:style-name="T1"> </text:span><text:span text:style-name="T2">(48/23) </text:span> ⲛ̣̅ϩ̣[ⲟϥ] ⲕ̣ⲁⲧⲁ ⲧⲟⲩ[ⲕ]ⲁ̣ϭ̣ⲓ̣[ⲁ· ⲁⲩ]ⲱ <text:line-break/><text:span text:style-name="T1"> </text:span><text:span text:style-name="T2">(48/24) </text:span> [ⲡϭ]ⲉ̣[ⲣ]ⲱ̣ⲃ̣ ⲉⲧ’ϩⲛ̅ ⲧϭⲓϫ ⲙ̅[ⲙ]ⲱⲩ‐ <text:line-break/><text:span text:style-name="T1"> </text:span><text:span text:style-name="T2">(48/25) </text:span> ⲥⲏⲥ ⲁϥϣⲱⲡⲉ ⲛ̅ϩⲟϥ ⲁϥⲱ̣ⲙⲕ̅ <text:line-break/><text:span text:style-name="T1"> </text:span><text:span text:style-name="T2">(48/26) </text:span> ⲛ̅ⲛ̅ϩⲟϥ ⲛ̅ⲛⲙ̅ⲙⲁ[ⲅ]ⲟⲥ· ⲡⲁⲗⲓⲛ <text:line-break/><text:span text:style-name="T1"> </text:span><text:span text:style-name="T2">(48/27) </text:span> ϥ̣ⲥⲏϩ̣ ϫⲉ ⲁϥⲧⲁⲙⲓⲟ ⲛ̅ⲟⲩϩⲟϥ ⲛ̅‐ <text:line-break/><text:span text:style-name="T1"> </text:span><text:span text:style-name="T2">(48/28) </text:span> [ϩ]ⲟⲙⲉⲧ’ ⲁϥⲧⲁⲗⲟϥ ⲉϫⲛ̅ ⲟⲩϣⲧⲉ <text:line-break/><text:span text:style-name="T1"> </text:span><text:span text:style-name="T2">(49/1) </text:span> [ 12+- ]ⲉ̣ ⲉⲧⲉⲣⲉ <text:line-break/><text:span text:style-name="T1"> </text:span><text:span text:style-name="T2">(49/2) </text:span> [ 15+- ⲁ]ⲩⲱ . <text:line-break/><text:span text:style-name="T1"> </text:span><text:span text:style-name="T2">(49/3) </text:span> [......]ϫⲉ ⲡ̣ⲉ[ⲧⲁϭⲱϣ]ⲧ’ ⲉⲣⲁ‐ <text:line-break/><text:span text:style-name="T1"> </text:span><text:span text:style-name="T2">(49/4) </text:span> [ⲧϥ̅ ⲙ̅ⲉⲡⲓϩⲟϥ] ⲛ̅ϩⲟⲙⲉ[ⲧ’] ⲙ̣[ⲛ̅]ⲗⲁⲁⲩ <text:line-break/><text:span text:style-name="T1"> </text:span><text:span text:style-name="T2">(49/5) </text:span> [ⲛⲁⲧⲉⲕⲟ] ⲙ̅ⲙⲟϥ· ⲁⲩⲱ ⲡ̣ⲉⲧⲁ[ⲣ̅]‐ <text:line-break/><text:span text:style-name="T1"> </text:span><text:span text:style-name="T2">(49/6) </text:span> [ⲡⲓⲥⲧⲉⲩⲉ ⲉ]ⲡ̣ⲓϩⲟϥ ⲛ̅ϩⲟⲙⲉ[ⲧ’] <text:line-break/><text:span text:style-name="T1"> </text:span><text:span text:style-name="T2">(49/7) </text:span> [ϥⲛⲁⲟⲩϫⲁ]ⲓ̣̈· ⲡⲁⲓ̈ ⲅⲁⲣ ⲡⲉⲭ̣̅̅ⲥ̣̅̅ <text:line-break/><text:span text:style-name="T1"> </text:span><text:span text:style-name="T2">(49/8) </text:span> [ⲛⲉⲛⲧⲁ]ⲩ̣[ⲣ̅]ⲡ̣ⲓⲥⲧⲉⲩⲉ ⲉⲣⲟϥ ⲁⲩ‐ <text:line-break/><text:soft-page-break/><text:span text:style-name="T1"> </text:span><text:span text:style-name="T2">(49/9) </text:span> [ϫⲓ ⲱⲛϩ̅·] ⲛⲉⲧⲉ ⲙ̅ⲡⲟⲩⲣ̅ⲡⲓⲥⲧ‐ <text:line-break/><text:span text:style-name="T1"> </text:span><text:span text:style-name="T2">(49/10) </text:span> [ⲉⲩⲉ ⲛⲁⲙ]ⲟ̣ⲩ· ⲟⲩⲟⲩ ϭⲉ ⲧⲉ ϯ‐ <text:line-break/><text:span text:style-name="T1"> </text:span><text:span text:style-name="T2">(49/11) </text:span> [ⲡⲓⲥⲧⲓⲥ· ⲛ̅ⲥ]ⲉ̣ⲣ̅ⲇⲓⲁ[ⲕⲟⲛ]ⲓ̣ ⲁⲛ ⲛ̣̅‐ <text:line-break/><text:span text:style-name="T1"> </text:span><text:span text:style-name="T2">(49/12) </text:span> [ 14+- ]ⲉ̣ⲛϥⲓ· <text:line-break/><text:span text:style-name="T1"> </text:span><text:span text:style-name="T2">(49/13) </text:span> [ 15+- ]ⲓ̣ⲕ[ <text:line-break/><text:span text:style-name="T1"> </text:span><text:span text:style-name="T2">(49/14) </text:span> (+-13 lines missing) <text:line-break/><text:span text:style-name="T1"> </text:span><text:span text:style-name="T2">(49/27) </text:span> ⲁ̣[ <text:line-break/><text:span text:style-name="T1"> </text:span><text:span text:style-name="T2">(49/28) </text:span> ⲛ̅ⲧⲉ̣[ⲧⲛ̅ <text:line-break/><text:span text:style-name="T1"> </text:span><text:span text:style-name="T2">(49/29) </text:span> ⲧⲛ̅ⲥ[ <text:line-break/><text:span text:style-name="T1"> </text:span><text:span text:style-name="T2">(50/1) </text:span> [ⲛ̅ⲧ]ⲉⲧⲛ̅ⲣ̅ⲛⲟ[ⲉⲓ ⲁⲛ ⲙ̅ⲡⲉⲭ̅ⲥ̅ ⲡ̅ⲛⲁ̅] <text:line-break/><text:span text:style-name="T1"> </text:span><text:span text:style-name="T2">(50/2) </text:span> ⲧ̣[ⲓ]ⲕⲱⲥ̣ [ⲉⲧⲉⲧⲛ̅ϫ[ⲱ̣ ⲙ̣̅ⲙ[ⲟⲥ ϫⲉ] <text:line-break/><text:span text:style-name="T1"> </text:span><text:span text:style-name="T2">(50/3) </text:span> ⲉⲛⲣ̅ⲡ[ⲓⲥⲧⲉⲩ]ⲉ ⲉⲡⲉⲭ̣[̅ⲥ̅·̅ ⲧⲁⲓ̈] <text:line-break/><text:span text:style-name="T1"> </text:span><text:span text:style-name="T2">(50/4) </text:span> ⲅ̣ⲁⲣ ⲧⲉ̣ [ⲑ]ⲉ [ⲉ]ⲧⲉ ⲙⲱⲩ̣[ⲥⲏⲥ ⲥϩⲁⲓ̈] <text:line-break/><text:span text:style-name="T1"> </text:span><text:span text:style-name="T2">(50/5) </text:span> [ⲕ]ⲁ̣ⲧⲁ ϫⲱ̣ⲱⲙⲉ· ⲡϫ̣[ⲱⲱⲙⲉ ⲙ̅]‐ <text:line-break/><text:span text:style-name="T1"> </text:span><text:span text:style-name="T2">(50/6) </text:span> [ⲡ]ⲉϫⲡⲟ ⲛ̅ⲁⲇⲁⲙ· ϥ̣[ⲥⲏϩ ⲛ̅ⲛⲁⲓ̈] <text:line-break/><text:span text:style-name="T1"> </text:span><text:span text:style-name="T2">(50/7) </text:span> ⲉⲧ’ϣⲟⲟⲡ’ ϩⲙ̅ ⲡϫ[ⲡⲟ] ⲙ̣̅[ⲡⲛⲟⲙⲟⲥ·] <text:line-break/><text:span text:style-name="T1"> </text:span><text:span text:style-name="T2">(50/8) </text:span> ⲥ̣ⲉⲣ̅ⲥⲧⲩⲭⲉⲓ ⲉⲡⲛ[ⲟ]ⲙ[ⲟⲥ ⲁⲩⲱ] <text:line-break/><text:span text:style-name="T1"> </text:span><text:span text:style-name="T2">(50/9) </text:span> ⲥⲉⲥ̣ⲱⲧⲙ̅ ⲛ̅ⲥⲱϥ· ⲁ̣[ⲩⲱ <text:line-break/><text:span text:style-name="T1"> </text:span><text:span text:style-name="T2">(50/10) </text:span> ⲁ̣ⲉ̣.[...].ⲟ̣ⲩ[ <text:line-break/><text:span text:style-name="T1"> </text:span><text:span text:style-name="T2">(50/11) </text:span> [ⲙ]ⲛ̅ ⲛⲉ[ <text:line-break/><text:span text:style-name="T1"> </text:span><text:span text:style-name="T2">(50/12) </text:span> [..]ⲛⲉ[ <text:line-break/><text:span text:style-name="T1"> </text:span><text:span text:style-name="T2">(50/13) </text:span> (+-13 lines missing) <text:line-break/><text:span text:style-name="T1"> </text:span><text:span text:style-name="T2">(50/26) </text:span> [ 18+- ]ⲙ̣ <text:line-break/><text:span text:style-name="T1"> </text:span><text:span text:style-name="T2">(50/27) </text:span> [ 15+- ⲁ]ⲛ ⲡ̣ⲉ <text:line-break/><text:span text:style-name="T1"> </text:span><text:span text:style-name="T2">(50/28) </text:span> [....]ⲕ[ 11+- ]ⲧ’· <text:line-break/><text:span text:style-name="T1"> </text:span><text:span text:style-name="T2">(51/1) </text:span> [ 11+- ]. ϥⲓⲛ[ <text:line-break/><text:span text:style-name="T1"> </text:span><text:span text:style-name="T2">(52/1) </text:span> [....]ⲕ̣[ <text:line-break/><text:span text:style-name="T1"> </text:span><text:span text:style-name="T2">(53/1) </text:span> [ 11+- ] ⲙ̣̅ⲡ̣ⲟ[ <text:line-break/><text:span text:style-name="T1"> </text:span><text:span text:style-name="T2">(53/2) </text:span> [ 11+- ] ⲙ̅ⲙⲟ̣[ <text:line-break/><text:span text:style-name="T1"> </text:span><text:span text:style-name="T2">(54/1) </text:span> [54] Blank fragment <text:line-break/><text:span text:style-name="T1"> </text:span><text:span text:style-name="T2">(55/1) </text:span> [...ⲑ]ⲟⲅ’ⲇⲟⲁⲥ ⲉ[ⲧ]ⲉ̣ ⲧⲙⲉϩ <text:line-break/><text:span text:style-name="T1"> </text:span><text:span text:style-name="T2">(55/2) </text:span> [ϣⲙⲟ]ⲩⲛⲉ ⲧⲉ· ⲁⲩⲱ ⲉⲛⲁϫⲓ ⲙ̅‐ <text:line-break/><text:span text:style-name="T1"> </text:span><text:span text:style-name="T2">(55/3) </text:span> [ⲡⲙⲁ] ⲉⲧⲙ̅ⲙⲁⲩ ⲙ̅ⲡⲥⲱⲧⲉ̓ <text:line-break/><text:span text:style-name="T1"> </text:span><text:span text:style-name="T2">(55/4) </text:span> [ⲛⲁⲓ̈ ⲇⲉ] ⲥⲟⲟⲩⲛ ⲁⲛ ϫⲉ ⲟⲩ ⲡⲉ〈ⲡ〉ⲥⲱ̣‐ <text:line-break/><text:span text:style-name="T1"> </text:span><text:span text:style-name="T2">(55/5) </text:span> [ⲧⲉ·] ⲁ̣ⲗⲗⲁ ϣⲁⲩⲃⲱⲕ ⲉϩⲟⲩⲛ <text:line-break/><text:span text:style-name="T1"> </text:span><text:span text:style-name="T2">(55/6) </text:span> [ⲉⲧⲃⲟⲟ]ⲛⲉ ⲁ̣ⲩⲱ ⲉϩ[ⲟ]ⲩ̣ⲛ ⲉⲟ̣[ⲩ] <text:line-break/><text:span text:style-name="T1"> </text:span><text:span text:style-name="T2">(55/7) </text:span> [....].[..]. ϩⲙ̅ ⲡⲙ̣ⲟⲩ ϩⲙ̅ ⲙ‐ <text:line-break/><text:span text:style-name="T1"> </text:span><text:span text:style-name="T2">(55/8) </text:span> [ⲙⲟⲩⲉⲓⲟⲟⲩⲉ] ⲡ̣ⲁ̣ⲓ̈ [ⲡⲉ] ⲡⲃⲁ̣ⲡⲧ[ⲓ]‐ <text:line-break/><text:span text:style-name="T1"> </text:span><text:span text:style-name="T2">(55/9) </text:span> [ⲥⲙⲁ ⲙ̅ⲡⲙⲟⲩ ⲉⲧⲟⲩⲣ̅]ⲡⲁⲣ̣[ⲁⲧⲏ]ⲣ̣ⲓ [ⲙ̅]‐ <text:line-break/><text:span text:style-name="T1"> </text:span><text:span text:style-name="T2">(55/10) </text:span> [ⲙⲟϥ <text:line-break/><text:span text:style-name="T1"> </text:span><text:span text:style-name="T2">(55/11) </text:span> (+-6 lines missing) <text:line-break/><text:span text:style-name="T1"> </text:span><text:span text:style-name="T2">(55/17) </text:span> [ 11+- {ⲉ̅]̅ⲓ} ⲉⲡⲙⲟ̣[ⲩ] <text:line-break/><text:span text:style-name="T1"> </text:span><text:span text:style-name="T2">(55/18) </text:span> [ 10+- ⲁⲩ]ⲱ̣ ⲧⲁⲓ̈ ⲧⲉ <text:line-break/><text:span text:style-name="T1"> </text:span><text:span text:style-name="T2">(55/19) </text:span> [ 12+- ]ⲉ ⲕⲁⲧⲁ <text:line-break/><text:span text:style-name="T1"> </text:span><text:span text:style-name="T2">(55/20) </text:span> (+-11 lines missing) <text:line-break/><text:span text:style-name="T1"> </text:span><text:span text:style-name="T2">(56/1) </text:span> ⲁ̣ϥϫⲱⲕ’ ⲉⲃ̣[ⲟ]ⲗ ⲙ̅ⲡ’ⲡⲱⲧ’ [ⲙ̅ⲡⲟⲩⲁ]‐ <text:line-break/><text:span text:style-name="T1"> </text:span><text:span text:style-name="T2">(56/2) </text:span> [ⲗ]ⲉⲛⲧⲓⲛⲟⲥ̣· ⲛ̅ⲧⲟϥ ϩⲱⲱϥ̣ [ⲙⲉⲛ] <text:line-break/><text:soft-page-break/><text:span text:style-name="T1"> </text:span><text:span text:style-name="T2">(56/3) </text:span> ⲉϥϣⲁϫⲉ ⲉⲑⲟⲅ’ⲇⲁⲟⲥ· ⲛⲉ̣[ϥⲙⲁ]‐ <text:line-break/><text:span text:style-name="T1"> </text:span><text:span text:style-name="T2">(56/4) </text:span> [ⲑ]ⲏⲧⲏⲥ ⲇⲉ ⲉⲩⲧⲛ̅ⲧⲱⲛ̣ [ⲉⲙ̅ⲙⲁ]‐ <text:line-break/><text:span text:style-name="T1"> </text:span><text:span text:style-name="T2">(56/5) </text:span> ⲑⲏⲧⲏⲥ ⲙ̅ⲡⲟⲩⲁⲗⲉⲛⲧⲓⲛ[ⲟⲥ·] <text:line-break/><text:span text:style-name="T1"> </text:span><text:span text:style-name="T2">(56/6) </text:span> ⲛ̅ⲧⲟⲟⲩ ϩⲱⲟⲩ ⲟⲛ ⲥⲉ[ <text:line-break/><text:span text:style-name="T1"> </text:span><text:span text:style-name="T2">(56/7) </text:span> ⲗ̣ⲟ ⲉⲡⲓⲁⲅⲁⲑⲟⲛ̣ [ⲁⲗ]ⲗ̣[ⲁ ⲟⲩⲛ̅]‐ <text:line-break/><text:span text:style-name="T1"> </text:span><text:span text:style-name="T2">(56/8) </text:span> ⲧ̣ⲁⲩ ⲙ̅ⲙ[ⲁ]ⲩ ⲛ̅ⲟⲩ[ϣⲙ̅ϣⲉ ⲛ̅ⲧⲉ] <text:line-break/><text:span text:style-name="T1"> </text:span><text:span text:style-name="T2">(56/9) </text:span> [ⲛ]ⲓⲉ[ⲓ]ⲇⲱⲗ̣[ⲟⲛ <text:line-break/><text:span text:style-name="T1"> </text:span><text:span text:style-name="T2">(56/10) </text:span> [.].[ <text:line-break/><text:span text:style-name="T1"> </text:span><text:span text:style-name="T2">(56/11) </text:span> (+-6 lines missing) <text:line-break/><text:span text:style-name="T1"> </text:span><text:span text:style-name="T2">(56/17) </text:span> ⲁϥϫⲉ ϩ[ⲁϩ ⲛ̅ϣⲁϫⲉ ⲁⲩⲱ ⲁϥ]‐ <text:line-break/><text:span text:style-name="T1"> </text:span><text:span text:style-name="T2">(56/18) </text:span> ⲥⲉϩ ϩⲁϩ̣ [ⲛ̅ϫⲱⲱⲙⲉ <text:line-break/><text:span text:style-name="T1"> </text:span><text:span text:style-name="T2">(56/19) </text:span> ϣⲁϫⲉ [ <text:line-break/><text:span text:style-name="T1"> </text:span><text:span text:style-name="T2">(56/20) </text:span> (+-11 lines missing) <text:line-break/><text:span text:style-name="T1"> </text:span><text:span text:style-name="T2">(57/1) </text:span> [..ⲥⲉⲟ]ⲩⲟⲛϩ̅ ⲉⲃⲟ̣[ⲗ] ⲉⲃⲟⲗ <text:line-break/><text:span text:style-name="T1"> </text:span><text:span text:style-name="T2">(57/2) </text:span> [ϩⲙ̅ ⲡϣⲧ]ⲟ̣ⲣⲧⲣ̅ ⲉⲧⲟⲩⲛ̣̅ϩ̣ⲏⲧϥ̅ <text:line-break/><text:span text:style-name="T1"> </text:span><text:span text:style-name="T2">(57/3) </text:span> [ϩⲛ̅ ⲧⲁ]ⲡⲁⲧⲏ ⲛ̅ⲧⲉ ⲡⲕⲟⲥⲙⲟⲥ <text:line-break/><text:span text:style-name="T1"> </text:span><text:span text:style-name="T2">(57/4) </text:span> [ϣⲁⲩ]ⲃ̣ⲱⲕ’ ⲅⲁⲣ ⲉⲡⲙⲁ ⲉⲧⲙ̅‐ <text:line-break/><text:span text:style-name="T1"> </text:span><text:span text:style-name="T2">(57/5) </text:span> [ⲙⲁⲩ] ⲙⲛ̅ ⲡⲟⲩⲥⲟⲟⲩⲛ <text:line-break/><text:span text:style-name="T1"> </text:span><text:span text:style-name="T2">(57/6) </text:span> [ⲉⲧϣ]ⲟ̣ⲩⲉⲓⲧ’· ⲡⲕⲉⲓ̈ⲥⲓⲇⲱ‐ <text:line-break/><text:span text:style-name="T1"> </text:span><text:span text:style-name="T2">(57/7) </text:span> [ⲣⲟⲥ ⲡⲉϥϣⲏⲣⲉ] ⲛⲉϥⲧⲛ̅ⲧⲱⲛ <text:line-break/><text:span text:style-name="T1"> </text:span><text:span text:style-name="T2">(57/8) </text:span> [ⲉⲡⲃⲁⲥⲓⲗⲉⲓⲇ]ⲏ̣ⲥ ⲛ̅ⲧⲟϥ ϩⲱ‐ <text:line-break/><text:span text:style-name="T1"> </text:span><text:span text:style-name="T2">(57/9) </text:span> [ⲱϥ 7+- ]ϩⲁϩ· ⲁ̣[ⲩ]ⲱ ⲁ[ϥ] <text:line-break/><text:span text:style-name="T1"> </text:span><text:span text:style-name="T2">(57/10) </text:span> [ 9+- ⲙ̅]ⲡϥ̅[..] ⲇⲉ [ <text:line-break/><text:span text:style-name="T1"> </text:span><text:span text:style-name="T2">(57/11) </text:span> [ 11+- ]ⲥ̣ⲱ[.] ⲧⲉⲓ̣̈[ <text:line-break/><text:span text:style-name="T1"> </text:span><text:span text:style-name="T2">(57/12) </text:span> [ 11+- ]ⲕⲉⲙ[ⲁ]ⲑ̣ⲏⲧ̣[ⲏⲥ] <text:line-break/><text:span text:style-name="T1"> </text:span><text:span text:style-name="T2">(57/13) </text:span> [ 10+- ⲃ]ⲗ̅ⲗ̣ⲉ̣ ⲛ̅ⲧⲉ[ <text:line-break/><text:span text:style-name="T1"> </text:span><text:span text:style-name="T2">(57/14) </text:span> [ 8+- ⲁⲗ]ⲗ̣ⲁ̣ [ⲁϥ]ⲧⲁⲁⲩ <text:line-break/><text:span text:style-name="T1"> </text:span><text:span text:style-name="T2">(57/15) </text:span> [ 11+- ⲛϩⲏⲇ]ⲟⲛⲏ̣ <text:line-break/><text:span text:style-name="T1"> </text:span><text:span text:style-name="T2">(57/16) </text:span> [ 15+- ]ϫ̣[ <text:line-break/><text:span text:style-name="T1"> </text:span><text:span text:style-name="T2">(57/17) </text:span> (+-14 lines missing) <text:line-break/><text:span text:style-name="T1"> </text:span><text:span text:style-name="T2">(58/1) </text:span> ⲛ̅ⲥⲉⲣ̅ⲥ̣ⲩⲙⲫⲱⲛⲓ̣ [ⲁⲛ ⲉ]‐ <text:line-break/><text:span text:style-name="T1"> </text:span><text:span text:style-name="T2">(58/2) </text:span> ⲛⲉ[ⲩ]ⲉ̣ⲣⲏⲟⲩ· ⲛ̅ⲥⲓ̣[ⲙⲱ]‐ <text:line-break/><text:span text:style-name="T1"> </text:span><text:span text:style-name="T2">(58/3) </text:span> ⲛⲓⲁⲛⲟⲥ ⲅⲁⲣ ⲥⲉϫⲓ ϩ̣[ⲓ̅ⲟⲙⲉ] <text:line-break/><text:span text:style-name="T1"> </text:span><text:span text:style-name="T2">(58/4) </text:span> ⲥⲉϫⲡⲉ ϣⲏⲣⲉ· ⲛ̅[ <text:line-break/><text:span text:style-name="T1"> </text:span><text:span text:style-name="T2">(58/5) </text:span> ⲁⲛⲟⲥ ⲇⲉ ⲥⲉⲣ̅ⲉⲅ’ⲕ[ⲣⲁⲧⲉⲩⲉ] <text:line-break/><text:span text:style-name="T1"> </text:span><text:span text:style-name="T2">(58/6) </text:span> ϫⲓⲛ ⲧⲟⲩⲫⲩⲥⲓ[ⲥ <text:line-break/><text:span text:style-name="T1"> </text:span><text:span text:style-name="T2">(58/7) </text:span> ⲉϩⲣⲁⲓ̈ ⲉⲩⲡⲁ̣[ⲑⲟⲥ <text:line-break/><text:span text:style-name="T1"> </text:span><text:span text:style-name="T2">(58/8) </text:span> ⲛ̅ⲥⲧⲁⲅⲱⲛ ⲛ̣̅[ <text:line-break/><text:span text:style-name="T1"> </text:span><text:span text:style-name="T2">(58/9) </text:span> ⲧ̣ⲱϩⲥ̣̅ ⲙ̅ⲙⲟ̣[ⲟⲩ <text:line-break/><text:span text:style-name="T1"> </text:span><text:span text:style-name="T2">(58/10) </text:span> [.]ⲩ.ⲁ̣ϥ̣ⲟ.[ <text:line-break/><text:span text:style-name="T1"> </text:span><text:span text:style-name="T2">(58/11) </text:span> ⲇⲉ [ⲛ̅]ⲧ̣ⲁⲛ̣[....ⲥⲉⲣ̅ⲥⲩⲙⲫⲱ]‐ <text:line-break/><text:span text:style-name="T1"> </text:span><text:span text:style-name="T2">(58/12) </text:span> ⲛⲓ ⲉⲛⲉⲩⲉ[ⲣⲏⲟⲩ <text:line-break/><text:span text:style-name="T1"> </text:span><text:span text:style-name="T2">(58/13) </text:span> ⲛⲁϥ [..]ⲁ̣.[ <text:line-break/><text:span text:style-name="T1"> </text:span><text:span text:style-name="T2">(58/14) </text:span> ⲥⲉϫ̣[ <text:line-break/><text:span text:style-name="T1"> </text:span><text:span text:style-name="T2">(58/15) </text:span> (+-16 lines missing) <text:line-break/><text:span text:style-name="T1"> </text:span><text:span text:style-name="T2">(59/1) </text:span> [ 12+- ]..ⲁⲩ ⲛ̅ⲕⲣⲓ‐ <text:line-break/><text:span text:style-name="T1"> </text:span><text:span text:style-name="T2">(59/2) </text:span> [ⲥⲓⲥ 7+- ⲛ̅]ⲛⲁⲓ̈ ⲉⲧⲃⲉ ⲛ̅ <text:line-break/><text:soft-page-break/><text:span text:style-name="T1"> </text:span><text:span text:style-name="T2">(59/3) </text:span> [ 10+- ]..ⲉ ⲙ̅ⲙⲟⲟⲩ <text:line-break/><text:span text:style-name="T1"> </text:span><text:span text:style-name="T2">(59/4) </text:span> [ 11+- ] ⲛ̅ϩⲉⲣⲉⲧⲓⲕⲟⲥ <text:line-break/><text:span text:style-name="T1"> </text:span><text:span text:style-name="T2">(59/5) </text:span> [ 11+- ]ⲥ̣ⲭⲓⲥⲙⲁ ⲛⲁⲓ̈ <text:line-break/><text:span text:style-name="T1"> </text:span><text:span text:style-name="T2">(59/6) </text:span> [ 11+- ] ⲙⲛ̅ ⲛ̅ϩⲟⲟⲩⲧ’̣ <text:line-break/><text:span text:style-name="T1"> </text:span><text:span text:style-name="T2">(59/7) </text:span> [ 8+- ϩⲉⲛ]ⲣ̣ⲱⲙⲉ ⲛⲉ· <text:line-break/><text:span text:style-name="T1"> </text:span><text:span text:style-name="T2">(59/8) </text:span> [ 11+- ⲉ]ⲩ[ⲛ]ⲁϣⲱ̣ⲡⲉ <text:line-break/><text:span text:style-name="T1"> </text:span><text:span text:style-name="T2">(59/9) </text:span> [ⲛ̅ⲛ̅ⲕⲟⲥⲙⲟⲕⲣⲁⲧⲱⲣ ⲛ̅]ⲧⲉ ⲡⲕ̣ⲁ̣ⲕⲉ <text:line-break/><text:span text:style-name="T1"> </text:span><text:span text:style-name="T2">(59/10) </text:span> [ 13+- ]ⲙⲟ[..]. <text:line-break/><text:span text:style-name="T1"> </text:span><text:span text:style-name="T2">(59/11) </text:span> [ 11+- ] ⲙ̣̅[ⲡⲕⲟ]ⲥⲙ̣[ⲟⲥ] <text:line-break/><text:span text:style-name="T1"> </text:span><text:span text:style-name="T2">(59/12) </text:span> [ 11+- ]ⲡⲉϩⲟⲩ[ <text:line-break/><text:span text:style-name="T1"> </text:span><text:span text:style-name="T2">(59/13) </text:span> [ 10+- ⲟ]ⲩⲛ̣̅ⲧⲁⲩ ⲙ̅ⲙ̣[ⲁⲩ] <text:line-break/><text:span text:style-name="T1"> </text:span><text:span text:style-name="T2">(59/14) </text:span> [ 12+- ]ⲡ’ ⲛ̅ⲁⲣ[ⲭ]‐ <text:line-break/><text:span text:style-name="T1"> </text:span><text:span text:style-name="T2">(59/15) </text:span> [ⲱⲛ 9+- ϭ]ⲟ̣ⲙ̣[ <text:line-break/><text:span text:style-name="T1"> </text:span><text:span text:style-name="T2">(59/16) </text:span> (1 line missing) <text:line-break/><text:span text:style-name="T1"> </text:span><text:span text:style-name="T2">(59/17) </text:span> [ 11+- ⲣ̅ⲕ]ⲣ̣ⲓⲛⲉ ⲙ̅ⲙⲟ‐ <text:line-break/><text:span text:style-name="T1"> </text:span><text:span text:style-name="T2">(59/18) </text:span> [ⲟⲩ 11+- ]ⲓⲁⲛⲟⲥ ⲇⲉ <text:line-break/><text:span text:style-name="T1"> </text:span><text:span text:style-name="T2">(59/19) </text:span> [ 13+- ]ϣ̣ⲁϫⲉ ⲛ̅ <text:line-break/><text:span text:style-name="T1"> </text:span><text:span text:style-name="T2">(59/20) </text:span> (+-11 lines missing) <text:line-break/><text:span text:style-name="T1"> </text:span><text:span text:style-name="T2">(60/1) </text:span> ϣⲁϫⲉ ⲉⲩ̣[ <text:line-break/><text:span text:style-name="T1"> </text:span><text:span text:style-name="T2">(60/2) </text:span> ϣⲱⲡⲉ ⲉⲩⲟ̣ ⲛ̣̅[ <text:line-break/><text:span text:style-name="T1"> </text:span><text:span text:style-name="T2">(60/3) </text:span> ϩⲛ̅ ⲟⲩⲕⲱϩⲧ̅’̣ ⲛ̣̅[ⲁⲧⲱϣⲙ̅ <text:line-break/><text:span text:style-name="T1"> </text:span><text:span text:style-name="T2">(60/4) </text:span> ⲉⲩⲣ̅ⲕⲟⲗⲁⲍⲉ̣ [ⲙ̅ⲙⲟⲟⲩ· ⲛⲁⲓ̈ ⲇⲉ] <text:line-break/><text:span text:style-name="T1"> </text:span><text:span text:style-name="T2">(60/5) </text:span> ⲉⲧ’ϣⲟⲟⲡ’ ⲉ̣[ⲃⲟⲗ ϩⲛ̅ ⲧⲅⲉⲛⲉⲁ] <text:line-break/><text:span text:style-name="T1"> </text:span><text:span text:style-name="T2">(60/6) </text:span> ⲙ̅ⲡϣⲏⲣⲉ ⲙ̅ⲡ̣[ⲣⲱⲙⲉ ⲁⲩϭⲟⲗⲡ]‐ <text:line-break/><text:span text:style-name="T1"> </text:span><text:span text:style-name="T2">(60/7) </text:span> ⲟⲩ ⲉⲃⲟⲗ ⲉⲡ[....ϩⲛ̅ ⲙ̅ⲡⲣⲁ]‐ <text:line-break/><text:span text:style-name="T1"> </text:span><text:span text:style-name="T2">(60/8) </text:span> ⲅⲙⲁ ⲧ̣ⲏⲣⲟ̣ⲩ [ <text:line-break/><text:span text:style-name="T1"> </text:span><text:span text:style-name="T2">(60/9) </text:span> ⲟⲩ[..]ⲉⲟ[ <text:line-break/><text:span text:style-name="T1"> </text:span><text:span text:style-name="T2">(60/10) </text:span> [....]ϣⲙ̅ [ <text:line-break/><text:span text:style-name="T1"> </text:span><text:span text:style-name="T2">(60/11) </text:span> [ⲥⲙⲟ]ⲕϩ̅ ⲇ̣ⲉ̣ ⲉ[ <text:line-break/><text:span text:style-name="T1"> </text:span><text:span text:style-name="T2">(60/12) </text:span> [...]ⲱ̣ ⲉϭⲛ̅ ⲟ[ⲩⲁ <text:line-break/><text:span text:style-name="T1"> </text:span><text:span text:style-name="T2">(60/13) </text:span> [ⲁ]ⲩ̣ⲱ ⲥⲛⲁ[ⲩ <text:line-break/><text:span text:style-name="T1"> </text:span><text:span text:style-name="T2">(60/14) </text:span> [...] ⲉⲃ̣[ⲟⲗ <text:line-break/><text:span text:style-name="T1"> </text:span><text:span text:style-name="T2">(60/15) </text:span> (1 line missing) <text:line-break/><text:span text:style-name="T1"> </text:span><text:span text:style-name="T2">(60/16) </text:span> ϫⲉ ⲁⲡⲥⲱ[ⲧⲏⲣ ϫⲟⲟⲥ ⲛ̅ⲛⲉϥⲙⲁ]‐ <text:line-break/><text:span text:style-name="T1"> </text:span><text:span text:style-name="T2">(60/17) </text:span> ⲑⲏⲧⲏⲥ ϫⲉ̣ [ <text:line-break/><text:span text:style-name="T1"> </text:span><text:span text:style-name="T2">(60/18) </text:span> ⲟⲩⲁ ϩⲛ̅ ϩ[ⲉⲛ <text:line-break/><text:span text:style-name="T1"> </text:span><text:span text:style-name="T2">(60/19) </text:span> ⲧ̣ⲣ̣[ <text:line-break/><text:span text:style-name="T1"> </text:span><text:span text:style-name="T2">(60/20) </text:span> (+-11 lines missing) <text:line-break/><text:span text:style-name="T1"> </text:span><text:span text:style-name="T2">(61/1) </text:span> [ 10+- ⲁⲩ]ⲱ̣ ⲉⲩⲛ̅ⲧⲁϥ <text:line-break/><text:span text:style-name="T1"> </text:span><text:span text:style-name="T2">(61/2) </text:span> [ⲙ̅ⲙⲁⲩ......] ⲛ̅ⲥⲟⲫⲓⲁ {ϩⲓ̅} ⲙⲛ̅ <text:line-break/><text:span text:style-name="T1"> </text:span><text:span text:style-name="T2">(61/3) </text:span> [ⲟⲩϣⲟϫⲛⲉ ⲙⲛ̅ ⲟ]ⲩ̣ⲙⲛ̅ⲧ’ⲥⲁⲃⲉ ⲙⲛ̅ <text:line-break/><text:span text:style-name="T1"> </text:span><text:span text:style-name="T2">(61/4) </text:span> [ⲟⲩⲙⲛ̅ⲧ’ⲣⲙ̅ⲛ̅ϩⲏⲧ’] ⲙⲛ̅ ⲟⲩⲅⲛⲱ[ⲥ]‐ <text:line-break/><text:span text:style-name="T1"> </text:span><text:span text:style-name="T2">(61/5) </text:span> [ⲓⲥ ⲙⲛ̅ ⲟⲩⲇⲩⲛⲁ]ⲙ̣ⲓ̣ⲥ ⲙⲛ̅ ⲟⲩⲙⲉ· <text:line-break/><text:span text:style-name="T1"> </text:span><text:span text:style-name="T2">(61/6) </text:span> [ⲁⲩⲱ ⲟⲩⲛ̅ⲧⲁϥ] ⲙ̣̅ⲙⲁⲩ ⲛ̅ϩⲉⲛ[.]. <text:line-break/><text:span text:style-name="T1"> </text:span><text:span text:style-name="T2">(61/7) </text:span> [ 9+- ⲉ]ⲃ̣ⲟⲗ ⲙ̅ⲡⲥⲁⲛϩⲣⲉ̣ <text:line-break/><text:span text:style-name="T1"> </text:span><text:span text:style-name="T2">(61/8) </text:span> [ 10+- ]ⲁ̣ⲥ ⲡⲙⲁ ⲉⲛⲧⲁϥ <text:line-break/><text:span text:style-name="T1"> </text:span><text:span text:style-name="T2">(61/9) </text:span> [ 10+- ⲙ̅ⲙ]ⲁ̣ⲩ ⲛ̅ϭ̣[ⲓ] ⲡ̣ϣⲏ̣‐ <text:line-break/><text:soft-page-break/><text:span text:style-name="T1"> </text:span><text:span text:style-name="T2">(61/10) </text:span> [ⲣⲉ ⲙ̅ⲡⲣⲱⲙⲉ.....]ⲛ̅ ⲁ[..].̅[ <text:line-break/><text:span text:style-name="T1"> </text:span><text:span text:style-name="T2">(61/11) </text:span> [ 14+- ]ⲉϫ̣[ <text:line-break/><text:span text:style-name="T1"> </text:span><text:span text:style-name="T2">(61/12) </text:span> [ 10+- ⲇ]ⲩⲛⲁⲙⲓⲥ̣ [ <text:line-break/><text:span text:style-name="T1"> </text:span><text:span text:style-name="T2">(61/13) </text:span> [ 10+- ]ϩⲁ̣ⲣⲉϩ ⲉⲣ[ <text:line-break/><text:span text:style-name="T1"> </text:span><text:span text:style-name="T2">(61/14) </text:span> [ 13+- ]ⲩⲙ̅ⲕⲁ[ <text:line-break/><text:span text:style-name="T1"> </text:span><text:span text:style-name="T2">(61/15) </text:span> (+-16 lines missing) <text:line-break/><text:span text:style-name="T1"> </text:span><text:span text:style-name="T2">(62/1) </text:span> ⲉϥⲥⲟⲟⲩⲛ ⲛ̣̅[......ⲣ̅ⲕⲁⲧⲁ]‐ <text:line-break/><text:span text:style-name="T1"> </text:span><text:span text:style-name="T2">(62/2) </text:span> ⲗⲁⲙⲃⲁⲛⲉ ⲙ̅[ <text:line-break/><text:span text:style-name="T1"> </text:span><text:span text:style-name="T2">(62/3) </text:span> ⲁⲩⲱ ⲉⲡⲧⲏ̣[ 10+- ⲙ̅]‐ <text:line-break/><text:span text:style-name="T1"> </text:span><text:span text:style-name="T2">(62/4) </text:span> ⲡϣⲁ ⲙ̅ⲙⲟϥ̣[ <text:line-break/><text:span text:style-name="T1"> </text:span><text:span text:style-name="T2">(62/5) </text:span> ⲛ̅ⲁⲗⲏ̣ⲑⲉⲓⲛⲟ̣[ⲥ <text:line-break/><text:span text:style-name="T1"> </text:span><text:span text:style-name="T2">(62/6) </text:span> ϣⲙ̅ⲙ̣ⲟ ⲛ̣̅.[ <text:line-break/><text:span text:style-name="T1"> </text:span><text:span text:style-name="T2">(62/7) </text:span> ⲧⲣⲟⲥ ⲇⲉ ⲙⲛ̅[ <text:line-break/><text:span text:style-name="T1"> </text:span><text:span text:style-name="T2">(62/8) </text:span> ⲃⲟ[ⲟⲛ]ⲉ ϩⲛ̅[ <text:line-break/><text:span text:style-name="T1"> </text:span><text:span text:style-name="T2">(62/9) </text:span> ⲛⲓ̣[..] ⲛ.[ <text:line-break/><text:span text:style-name="T1"> </text:span><text:span text:style-name="T2">(62/10) </text:span> [...]ϥ..[ <text:line-break/><text:span text:style-name="T1"> </text:span><text:span text:style-name="T2">(62/11) </text:span> [...]ⲁϥϫ̣ⲓ̣ ⲃ̣ⲁ̣[ⲡⲧⲓⲥⲙⲁ <text:line-break/><text:span text:style-name="T1"> </text:span><text:span text:style-name="T2">(62/12) </text:span> [ⲁ]ⲩⲱ ⲛⲉⲧ̣ⲉ̣ [ <text:line-break/><text:span text:style-name="T1"> </text:span><text:span text:style-name="T2">(62/13) </text:span> [..]ϫ̣ⲉ ⲙ̅[ <text:line-break/><text:span text:style-name="T1"> </text:span><text:span text:style-name="T2">(62/14) </text:span> (+-17 lines missing) <text:line-break/><text:span text:style-name="T1"> </text:span><text:span text:style-name="T2">(65/1) </text:span> [ 10+- ϩ]ⲛ̅ ⲟ̣ⲩⲣⲁⲥⲟⲩ <text:line-break/><text:span text:style-name="T1"> </text:span><text:span text:style-name="T2">(65/2) </text:span> [ 11+- ]ⲟⲩϩⲁⲧ’ ⲛ̅ⲧⲟ <text:line-break/><text:span text:style-name="T1"> </text:span><text:span text:style-name="T2">(65/3) </text:span> [ 11+- ]ⲉ ⲇⲉ ⲣ̅ ⲣⲙ̅[ⲙⲁⲟ] <text:line-break/><text:span text:style-name="T1"> </text:span><text:span text:style-name="T2">(65/4) </text:span> [ 12+- ] ϩⲛ̅ ⲛ̣ⲉ̣ⲝ̣‐ <text:line-break/><text:span text:style-name="T1"> </text:span><text:span text:style-name="T2">(65/5) </text:span> [ⲟⲩⲥⲓⲁ 9+- ]ⲁⲩ ⲉⲣⲉ̣ <text:line-break/><text:span text:style-name="T1"> </text:span><text:span text:style-name="T2">(65/6) </text:span> [ 11+- ⲡⲙ]ⲉϩⲥⲉ ⲇⲉ <text:line-break/><text:span text:style-name="T1"> </text:span><text:span text:style-name="T2">(65/7) </text:span> [ 10+- ⲧ]ⲁ̣ⲓ̣̈ ⲧⲉ ⲑⲉ ⲛ̅ <text:line-break/><text:span text:style-name="T1"> </text:span><text:span text:style-name="T2">(65/8) </text:span> [ 13+- ]ⲕⲟⲥⲙⲟⲥ <text:line-break/><text:span text:style-name="T1"> </text:span><text:span text:style-name="T2">(65/9) </text:span> [ 14+- ] ⲇⲉ ⲉⲩ <text:line-break/><text:span text:style-name="T1"> </text:span><text:span text:style-name="T2">(65/10) </text:span> [ 12+- ]ⲟ̣ⲩⲛⲟⲩⲃ <text:line-break/><text:span text:style-name="T1"> </text:span><text:span text:style-name="T2">(65/11) </text:span> [ 15+- ]ⲛ̅ⲧ̣[ <text:line-break/><text:span text:style-name="T1"> </text:span><text:span text:style-name="T2">(65/12) </text:span> (+-16 lines missing) <text:line-break/><text:span text:style-name="T1"> </text:span><text:span text:style-name="T2">(65/28) </text:span> [ 9+- ]ⲙ̅ⲡⲉⲛ[...]ⲛ <text:line-break/><text:span text:style-name="T1"> </text:span><text:span text:style-name="T2">(65/29) </text:span> [ 9+- ⲉⲩⲙ]ⲉⲉⲩⲉ ϫⲉ̣ <text:line-break/><text:span text:style-name="T1"> </text:span><text:span text:style-name="T2">(65/30) </text:span> [ 12+- ]ⲩ ⲉⲃⲟⲗ <text:line-break/><text:span text:style-name="T1"> </text:span><text:span text:style-name="T2">(65/31) </text:span> [ 7+- ] ⲁ̣ⲛ̣ⲃ̣ⲱ̣ⲗ ⲉⲃⲟⲗ ϩⲛ̣̅ <text:line-break/><text:span text:style-name="T1"> </text:span><text:span text:style-name="T2">(66/1) </text:span> ⲧⲥⲁⲣⲁⲝ· ⲟⲩ[ <text:line-break/><text:span text:style-name="T1"> </text:span><text:span text:style-name="T2">(66/2) </text:span> ⲙⲉ[.]ⲧ̣[.]ⲁ̣ ⲇ[ⲉ <text:line-break/><text:span text:style-name="T1"> </text:span><text:span text:style-name="T2">(66/3) </text:span> ⲧⲙ̅ⲕⲟⲧϥ̅ ⲉⲣ[ <text:line-break/><text:span text:style-name="T1"> </text:span><text:span text:style-name="T2">(66/4) </text:span> [..]ⲓ̣̅̅ⲥ̅ [.]ⲛ̣̅[ <text:line-break/><text:span text:style-name="T1"> </text:span><text:span text:style-name="T2">(66/5) </text:span> ⲙⲉ̣ ⲇⲉ[ <text:line-break/><text:span text:style-name="T1"> </text:span><text:span text:style-name="T2">(66/6) </text:span> [ⲧ]ⲁⲣⲭⲏ ⲙ̣[ <text:line-break/><text:span text:style-name="T1"> </text:span><text:span text:style-name="T2">(66/7) </text:span> ⲟⲩϣⲏⲣ[ⲉ <text:line-break/><text:span text:style-name="T1"> </text:span><text:span text:style-name="T2">(66/8) </text:span> ⲉⲧⲉ ⲥⲉ̣[ <text:line-break/><text:span text:style-name="T1"> </text:span><text:span text:style-name="T2">(66/9) </text:span> ⲉⲃⲟⲗ ϩ[ⲛ̅ 11+- ⲉ]‐ <text:line-break/><text:span text:style-name="T1"> </text:span><text:span text:style-name="T2">(66/10) </text:span> ⲧ̣ⲉ ⲡⲧⲩⲡ̣[ⲟⲥ ⲡⲉ <text:line-break/><text:span text:style-name="T1"> </text:span><text:span text:style-name="T2">(66/11) </text:span> [ⲟⲩⲟ]ⲉⲓⲛ [ⲛ̅ <text:line-break/><text:soft-page-break/><text:span text:style-name="T1"> </text:span><text:span text:style-name="T2">(66/12) </text:span> (+-15 lines missing) <text:line-break/><text:span text:style-name="T1"> </text:span><text:span text:style-name="T2">(66/27) </text:span> [......]ⲁ̣[ <text:line-break/><text:span text:style-name="T1"> </text:span><text:span text:style-name="T2">(66/28) </text:span> ⲛ̅ϭ̣ⲛ̣̅ ⲉⲃⲟⲗ ϩ[ⲛ̅ <text:line-break/><text:span text:style-name="T1"> </text:span><text:span text:style-name="T2">(66/29) </text:span> ϫⲱϩⲙ̅ ⲉⲧ̣[ <text:line-break/><text:span text:style-name="T1"> </text:span><text:span text:style-name="T2">(66/30) </text:span> ⲉⲩⲉⲁ[...]ⲁ̣[.].[ <text:line-break/><text:span text:style-name="T1"> </text:span><text:span text:style-name="T2">(66/31) </text:span> [ⲉⲩ]ϫ̣ⲓ ⲟⲩⲁ ⲁⲛ [ <text:line-break/><text:span text:style-name="T1"> </text:span><text:span text:style-name="T2">(67/1) </text:span> ⲙ̣̅[ⲙⲟ]ⲟⲩ ⲁⲛ· ⲟⲩⲇⲉ ⲙ̅ⲙⲛ̅ⲗⲁⲁⲩ ⲛ̅ϩⲏ‐ <text:line-break/><text:span text:style-name="T1"> </text:span><text:span text:style-name="T2">(67/2) </text:span> [ⲇⲟⲛⲏ· ⲟ]ⲩⲇⲉ ⲉⲡⲓⲑⲩⲙⲓⲁ· ⲟⲩⲧⲉ <text:line-break/><text:span text:style-name="T1"> </text:span><text:span text:style-name="T2">(67/3) </text:span> [ⲙⲁⲩϣ]ⲣ̣̅ⲕⲁⲧⲉⲭⲉ ⲙ̅ⲙⲟⲟⲩ· ϣ̅ϣⲉ̣ <text:line-break/><text:span text:style-name="T1"> </text:span><text:span text:style-name="T2">(67/4) </text:span> [ⲇⲉ ⲉⲧ]ⲣⲉⲩϣⲱⲡ̣ⲉ ⲉⲩⲟ ⲛ̅ⲛⲁⲧ’ⲧⲱⲗⲙ̣̅ <text:line-break/><text:span text:style-name="T1"> </text:span><text:span text:style-name="T2">(67/5) </text:span> [ϫⲉⲕ]ⲁ̣ⲁⲥ ⲉⲩⲛ[ⲁ]ϣⲱⲡⲉ ⲉⲩⲟⲩ <text:line-break/><text:span text:style-name="T1"> </text:span><text:span text:style-name="T2">(67/6) </text:span> [ⲟⲛϩ̅] ⲉⲃⲟⲗ ⲛ̅[ⲟⲩⲟ]ⲛ ⲛⲓⲙ ϫⲉ ϩⲉⲛⲉ‐ <text:line-break/><text:span text:style-name="T1"> </text:span><text:span text:style-name="T2">(67/7) </text:span> [ⲃⲟⲗ ⲛ]ⲉ ϩⲛ̅ ⲧⲅ̣[ⲉⲛⲉⲁ ⲙ̅ⲡ]ϣⲏⲣⲉ ⲙ̅ⲡⲣⲱ‐ <text:line-break/><text:span text:style-name="T1"> </text:span><text:span text:style-name="T2">(67/8) </text:span> ⲙ̣[ⲉ·] ⲉ̣ⲧ̣ⲃⲏⲏ[ⲧⲟⲩ] ⲉ̣ⲁⲡⲥⲱⲧⲏⲣ ⲣ̅‐ <text:line-break/><text:span text:style-name="T1"> </text:span><text:span text:style-name="T2">(67/9) </text:span> ⲙⲛ̅[ⲧ]ⲣ̣ⲉ· ⲛ[ⲉⲧ’ϣⲟ]ⲟⲡ’ ⲇⲉ ⲉⲃⲟⲗ ϩⲙ̅ <text:line-break/><text:span text:style-name="T1"> </text:span><text:span text:style-name="T2">(67/10) </text:span> [ⲡ]ⲉⲥⲡⲉⲣⲙ̣[ⲁ ⲛ̅ⲁⲇⲁⲙ] ⲥⲉⲟⲩⲟⲛϩ̅ ⲉⲃ̣[ⲟⲗ] <text:line-break/><text:span text:style-name="T1"> </text:span><text:span text:style-name="T2">(67/11) </text:span> [ϩ]ⲛ̣̅ ⲛⲉⲩⲡⲣ[ⲁⲝⲓⲥ ⲉⲧⲟ] ⲙ̅ⲡⲉⲩⲉⲣ̣[ⲅⲟⲛ·] <text:line-break/><text:span text:style-name="T1"> </text:span><text:span text:style-name="T2">(67/12) </text:span> [ⲉ]ⲙ̣ⲡⲟⲩⲗⲟ [ⲉⲃⲟⲗ ϩⲛ̅ ⲧⲉ]ⲡⲓⲑ[ⲩⲙⲓⲁ ⲉⲧ’]‐ <text:line-break/><text:span text:style-name="T1"> </text:span><text:span text:style-name="T2">(67/13) </text:span> [ϩⲟ]ⲟ̣ⲩ [ 8+- ]ⲉϭⲉ ⲣⲱ[ <text:line-break/><text:span text:style-name="T1"> </text:span><text:span text:style-name="T2">(67/14) </text:span> [ 12+- ⲁ]ⲗⲗⲁ ϩⲉⲛⲥ̣[ <text:line-break/><text:span text:style-name="T1"> </text:span><text:span text:style-name="T2">(67/15) </text:span> [ 13+- ]ⲛ ⲛ̅ⲟⲩϩⲟⲣ[ <text:line-break/><text:span text:style-name="T1"> </text:span><text:span text:style-name="T2">(67/16) </text:span> [...]ⲛ̣[ 8+- ] ⲛ̣̅ⲛ̅ⲁⲅ’ⲅⲉⲗⲟⲥ· [ <text:line-break/><text:span text:style-name="T1"> </text:span><text:span text:style-name="T2">(67/17) </text:span> [...] ⲅⲁⲣ [ 7+- ]ⲟⲣ ⲉⲧⲟ̣ⲩϫⲡⲟ ⲉ. <text:line-break/><text:span text:style-name="T1"> </text:span><text:span text:style-name="T2">(67/18) </text:span> [..]ⲛⲁ{ⲉ̅ⲓ} [ 9+- ]ϣ̣ ⲙⲛ ⲛⲉⲩ.[ <text:line-break/><text:span text:style-name="T1"> </text:span><text:span text:style-name="T2">(67/19) </text:span> (+-3 lines missing) <text:line-break/><text:span text:style-name="T1"> </text:span><text:span text:style-name="T2">(67/22) </text:span> [...]......[ <text:line-break/><text:span text:style-name="T1"> </text:span><text:span text:style-name="T2">(67/23) </text:span> [...]ⲉ̣[ <text:line-break/><text:span text:style-name="T1"> </text:span><text:span text:style-name="T2">(67/24) </text:span> (+-3 lines missing) <text:line-break/><text:span text:style-name="T1"> </text:span><text:span text:style-name="T2">(67/26) </text:span> [ 18+- ].[ <text:line-break/><text:span text:style-name="T1"> </text:span><text:span text:style-name="T2">(67/27) </text:span> [ 15+- ]ⲕⲓⲙ ⲉⲩ <text:line-break/><text:span text:style-name="T1"> </text:span><text:span text:style-name="T2">(67/28) </text:span> [...]..[. ϩ]ⲙ̣̅ ⲡ̣ϩⲟⲟ[ⲩ ⲉ]ⲧ̣ⲟⲩⲛⲁϫⲡⲉ <text:line-break/><text:span text:style-name="T1"> </text:span><text:span text:style-name="T2">(67/29) </text:span> [ϣⲏⲣ]ⲉ· ⲟ̣ⲩ ⲙ̣ⲟⲛⲟⲛ ⲡ̣[ⲁ̣]ⲓ̣̈ ⲁⲗⲗⲁ ⲥⲉⲣ̅ <text:line-break/><text:span text:style-name="T1"> </text:span><text:span text:style-name="T2">(67/30) </text:span> [....]ⲕⲟ̣ⲓ̣ⲛ̣ⲱⲛ̣ⲓ ⲉⲩϯ ⲉⲕⲓⲃⲉ· <text:line-break/><text:span text:style-name="T1"> </text:span><text:span text:style-name="T2">(68/1) </text:span> ϩⲉⲛⲕⲟⲟⲩⲉ ⲇ̣ⲉ ϩⲙ̅ ⲡⲙⲟⲩ ⲛ̅[ <text:line-break/><text:span text:style-name="T1"> </text:span><text:span text:style-name="T2">(68/2) </text:span> ⲥ̣ⲉⲁⲙⲁϩⲧⲉ ⲙ̅ⲙⲟⲟⲩ ⲥⲉⲥ[ⲱⲕ’ ⲙ̅]‐ <text:line-break/><text:span text:style-name="T1"> </text:span><text:span text:style-name="T2">(68/3) </text:span> ⲙⲟⲟⲩ ⲥⲁⲥⲁ 〈ⲛⲓⲙ〉 ⲥⲉ[ⲣ̅]ϩⲏⲇⲁⲛⲉ ⲉ̣[ⲃⲟⲗ] <text:line-break/><text:span text:style-name="T1"> </text:span><text:span text:style-name="T2">(68/4) </text:span> ϩⲓ̅ⲧⲟⲟⲧϥ̅ ⲙ̅ⲡ̣ⲁ̣ⲙ̣ⲙ̣ⲱ̣ⲛⲁⲥ ⲛ̅ⲁ[ⲇⲓⲕⲟⲥ] <text:line-break/><text:span text:style-name="T1"> </text:span><text:span text:style-name="T2">(68/5) </text:span> ⲥⲉϯ ϩⲟⲙⲉⲧ’̣ [ⲉⲙⲏ]ⲥ̣ⲉ ⲥⲉⲣ̅ⲇⲓⲁ[ⲧⲣⲓⲃⲉ] <text:line-break/><text:span text:style-name="T1"> </text:span><text:span text:style-name="T2">(68/6) </text:span> ⲥⲉⲣ̅ ϩⲱ[ⲃ] ⲁ̣ⲛ̣· [ⲡⲉⲧ’]ϣ̣ⲟⲟⲡ’ ⲇⲉ [ⲛ̅ⲉⲓ]‐ <text:line-break/><text:span text:style-name="T1"> </text:span><text:span text:style-name="T2">(68/7) </text:span> ⲱⲧ’ ⲙ̅ⲡⲁ[ⲙⲙⲱⲛⲁⲥ] ⲡⲁⲓ̈ ⲉϥ[ϣⲟⲟⲡ’] <text:line-break/><text:span text:style-name="T1"> </text:span><text:span text:style-name="T2">(68/8) </text:span> ⲛ̅ⲉⲓⲱⲧ’ ⲛ̅ⲧⲥⲩ[ⲛⲟⲩ]ⲥⲓⲁ· ⲡⲉⲧ̣[ⲉⲩ]ⲛ̣̅ <text:line-break/><text:span text:style-name="T1"> </text:span><text:span text:style-name="T2">(68/9) </text:span> ϣϭⲟⲙ ⲇⲉ ⲙ̅ⲙ̣ⲟ[ϥ ⲉⲣ̅ⲁⲡⲟ]ⲧⲁⲥⲥⲉ̣ ⲛⲁⲩ <text:line-break/><text:span text:style-name="T1"> </text:span><text:span text:style-name="T2">(68/10) </text:span> ϥ̣ⲟⲩⲟⲛϩ̅ ⲉⲃⲟⲗ̣ [ϫⲉ ⲟⲩⲉⲃⲟ]ⲗ ⲡⲉ ϩⲛ̅ ⲧⲅ̣[ⲉ]‐ <text:line-break/><text:span text:style-name="T1"> </text:span><text:span text:style-name="T2">(68/11) </text:span> [ⲛ]ⲉⲁ ⲙ̅ⲡϣⲏ̣[ⲣⲉ ⲙ̅ⲡⲣⲱ]ⲙ̣ⲉ ⲉⲩⲛ̅ⲧⲁϥ̣ <text:line-break/><text:span text:style-name="T1"> </text:span><text:span text:style-name="T2">(68/12) </text:span> [ⲙ̅]ⲙ̣ⲁⲩ ⲛ̅ⲟⲩ[ϭⲟⲙ ⲉⲣ̅ⲕ]ⲁ̣ⲧⲏⲅ̣ⲟⲣⲓ ⲛⲁ̣[ⲩ] <text:line-break/><text:span text:style-name="T1"> </text:span><text:span text:style-name="T2">(68/13) </text:span> [..].ϣ̣ⲉⲛⲉ.[ 10+- ]ⲧ’· [ϥⲣ̅] <text:line-break/><text:span text:style-name="T1"> </text:span><text:span text:style-name="T2">(68/14) </text:span> [ⲕ]ⲁⲧⲉⲭⲉ ⲇⲉ [ <text:line-break/><text:soft-page-break/><text:span text:style-name="T1"> </text:span><text:span text:style-name="T2">(68/15) </text:span> [ⲙ]ⲉⲣⲟⲥ· ϩⲛ̅ ⲟⲩ[ <text:line-break/><text:span text:style-name="T1"> </text:span><text:span text:style-name="T2">(68/16) </text:span> [...] ϩⲛ̅ ⲟⲩⲕⲁϭⲓ̣ⲁ̣ [ⲁⲩⲱ ϥⲉⲓⲣ]ⲉ ⲙ̅ⲡ̣[ⲥⲁⲛ]‐ <text:line-break/><text:span text:style-name="T1"> </text:span><text:span text:style-name="T2">(68/17) </text:span> ⲃ̣ⲟⲗ ⲛ̅ⲑⲉ ⲙ̅ⲡⲥⲁⲛ̣[ϩⲟⲩⲛ· ϥⲉⲓ]ⲛ̣ⲉ ⲛ̅ⲟ[ⲩ]‐ <text:line-break/><text:span text:style-name="T1"> </text:span><text:span text:style-name="T2">(68/18) </text:span> [ⲁ]ⲅ’ⲅ̣[ⲉ]ⲗ̣ⲟⲥ̣ ⲉϥ̣[ 10+- ].[ <text:line-break/><text:span text:style-name="T1"> </text:span><text:span text:style-name="T2">(68/19) </text:span> (1 line missing) <text:line-break/><text:span text:style-name="T1"> </text:span><text:span text:style-name="T2">(68/20) </text:span> [ 9+- ⲇⲩⲛⲁ]ⲙⲓ̣ⲥ̣ ...ϣ̣ <text:line-break/><text:span text:style-name="T1"> </text:span><text:span text:style-name="T2">(68/21) </text:span> [ 8+- ]ⲙⲉ..[...].ⲉ̣ <text:line-break/><text:span text:style-name="T1"> </text:span><text:span text:style-name="T2">(68/22) </text:span> (3 lines missing) <text:line-break/><text:span text:style-name="T1"> </text:span><text:span text:style-name="T2">(68/26) </text:span> [.]ⲱ̣ⲉ.ⲁ.[ <text:line-break/><text:span text:style-name="T1"> </text:span><text:span text:style-name="T2">(68/27) </text:span> ⲁⲩⲱ ⲉⲁϥⲣ̣̅[ⲁ]ⲛⲁⲭⲱⲣ[ⲓ...] ⲁ̣ϥ̣[ⲕⲁ]‐ <text:line-break/><text:span text:style-name="T1"> </text:span><text:span text:style-name="T2">(68/28) </text:span> ⲣⲱϥ̓ ⲉⲁϥⲗⲟ ϩⲛ̅ ⲧⲙⲛ̅ⲧ’ϩⲁϩ [ⲛ̅ϣⲁ]‐ <text:line-break/><text:span text:style-name="T1"> </text:span><text:span text:style-name="T2">(68/29) </text:span> ϫⲉ ⲙⲛ̅ ϩⲉⲛϣⲁϫⲉ ⲙ̅ⲙⲓϣⲉ <text:line-break/><text:span text:style-name="T1"> </text:span><text:span text:style-name="T2">(69/1) </text:span> ⲡ[ⲉⲛⲧⲁϥ]ϭⲓⲛⲉ ⲇⲉ ⲙ̅ⲡ[ⲗⲟⲅⲟⲥ ⲉⲧ’ⲧⲛ̅ϩⲟ] <text:line-break/><text:span text:style-name="T1"> </text:span><text:span text:style-name="T2">(69/2) </text:span> [ⲁⲩⲱ ⲡⲉ]ⲛ̣ⲧⲁϥⲥⲟⲩⲱⲛ [ⲡⲓⲱⲧ’ ⲛ̅ⲧⲙⲉ] <text:line-break/><text:span text:style-name="T1"> </text:span><text:span text:style-name="T2">(69/3) </text:span> [ⲁϥⲙ̅ⲧ]ⲟⲛ ⲙ̅ⲙⲟϥ ⲁϥⲗⲟ ⲉ̣ϥ̣ϣⲓ̣[ⲛⲉ] ⲉⲁ̣ϥ̣‐ <text:line-break/><text:span text:style-name="T1"> </text:span><text:span text:style-name="T2">(69/4) </text:span> [ϭⲓⲛⲉ·] ⲛ̅ⲧⲁⲣⲉϥϭⲓⲛⲉ ⲇⲉ ⲁϥⲕ̣[ⲁⲣ]ⲱ̣ϥ· <text:line-break/><text:span text:style-name="T1"> </text:span><text:span text:style-name="T2">(69/5) </text:span> [ϩⲉⲛ]ⲕ̣ⲟⲩⲉⲓ ⲇⲉ ⲛⲉ̣ϣⲁϥϫⲟⲟⲩ ⲛ̣̅ⲛ̣ⲉ̣ⲧ’ <text:line-break/><text:span text:style-name="T1"> </text:span><text:span text:style-name="T2">(69/6) </text:span> [...]ⲟⲩⲉ ϩⲙ̅ ⲡ̣[ⲉ]ⲩϩ̣[ⲏ]ⲧ’ ⲛ̅ⲛⲟⲉⲣⲟⲥ ⲛ̅ <text:line-break/><text:span text:style-name="T1"> </text:span><text:span text:style-name="T2">(69/7) </text:span> [.].[.]ⲧ̣ⲉ· ⲟⲩⲛ̅ ϩ̣[ⲟⲉ]ⲓ̣ⲛ̣[ⲉ] ⲉⲩ{ⲉ̅ⲓ} ⲉϩⲟⲩⲛ <text:line-break/><text:span text:style-name="T1"> </text:span><text:span text:style-name="T2">(69/8) </text:span> ⲉⲧ̣ⲡ̣ⲓⲥⲧⲓⲥ ⲉⲩ[ϫⲓ ⲛ̅ⲛⲟ]ⲩⲃⲁⲡⲧⲓ̣ⲥ̣ⲙⲁ <text:line-break/><text:span text:style-name="T1"> </text:span><text:span text:style-name="T2">(69/9) </text:span> ϩⲱⲥ ⲉⲩⲛ̅ⲧⲉⲩ[ⲥ]ϥ̣̅ ⲙ̅ⲙⲁⲩ ⲛ̅ⲟ̣ⲩϩⲉⲗ‐ <text:line-break/><text:span text:style-name="T1"> </text:span><text:span text:style-name="T2">(69/10) </text:span> ⲡⲓⲥ ⲛ̅ⲟⲩϫⲁ̣[ⲓ̈ ⲡⲁⲓ̈] ⲉ̣ⲧⲟⲩⲙⲟⲩⲧⲉ <text:line-break/><text:span text:style-name="T1"> </text:span><text:span text:style-name="T2">(69/11) </text:span> ⲉ̣ⲣⲟϥ ϫⲉ ⲧ̣[ⲥⲫⲣⲁⲅⲓⲥ·] ⲉⲛⲥⲉⲉ̣[ⲓⲙⲉ] <text:line-break/><text:span text:style-name="T1"> </text:span><text:span text:style-name="T2">(69/12) </text:span> ⲁ̣ⲛ ϫⲉ ⲛ̅ⲉⲓⲟ̣[ⲧⲉ ⲙ̅]ⲡ̣ⲕ̣[ⲟ]ⲥⲙⲟⲥ ⲥⲉ[ⲟⲩ]‐ <text:line-break/><text:span text:style-name="T1"> </text:span><text:span text:style-name="T2">(69/13) </text:span> ⲟ̣ⲛϩ̅ ⲉⲃⲟⲗ ⲙ̅[ⲡⲙⲁ ⲉⲧ]ⲙ̣̅ⲙⲁⲩ· [ⲁⲗⲗⲁ] <text:line-break/><text:span text:style-name="T1"> </text:span><text:span text:style-name="T2">(69/14) </text:span> ⲛ̅ⲧⲟϥ ϩⲱⲱ̣[ϥ ϥⲉⲓⲙⲉ ϫ]ⲉ ⲥⲉⲣ̅ⲥⲫ̣[ⲣⲁ]‐ <text:line-break/><text:span text:style-name="T1"> </text:span><text:span text:style-name="T2">(69/15) </text:span> ⲅⲓⲍⲉ ⲙ̅ⲙⲟϥ [ⲡϣ]ⲏ̣ⲣⲉ ⲅⲁⲣ ⲙ̅ⲡ[ⲣⲱⲙⲉ] <text:line-break/><text:span text:style-name="T1"> </text:span><text:span text:style-name="T2">(69/16) </text:span> ⲙ̅ⲡ̣ⲉ̣ϥ̣ⲣ̅ⲃⲁⲡⲧ[ⲓⲍⲉ ⲛ̅]ⲗⲁⲁⲩ ϩⲛ̅ ⲛⲉϥ̣[ⲙⲁ]‐ <text:line-break/><text:span text:style-name="T1"> </text:span><text:span text:style-name="T2">(69/17) </text:span> ⲑⲏⲧⲏⲥ· [..]..[ⲉⲛⲉ]ⲩⲥⲏⲕ ⲇⲉ ⲉϩ[ⲣⲁⲓ̈] <text:line-break/><text:span text:style-name="T1"> </text:span><text:span text:style-name="T2">(69/18) </text:span> ⲉⲡ̣ⲱⲛϩ̣̅ [ⲛ̅ϭⲓ ⲛⲉ]ⲧ̣ⲟⲩⲣ̅ⲃⲁⲡⲧⲓⲍⲉ ⲙ̣̅‐ <text:line-break/><text:span text:style-name="T1"> </text:span><text:span text:style-name="T2">(69/19) </text:span> ⲙ̣ⲟⲟⲩ· ⲛⲉⲣ[ⲉ ⲡ]ⲕ̣ⲟⲥⲙⲟⲥ ⲛⲁϣⲱⲡ[ⲉ] <text:line-break/><text:span text:style-name="T1"> </text:span><text:span text:style-name="T2">(69/20) </text:span> ⲉ̣ϥϣⲟⲩⲉⲓⲧ’ ⲡ̣ⲉ̣ ⲁⲩⲱ ⲛ̣̅ⲉⲓⲟⲧⲉ ⲙ̣̅‐ <text:line-break/><text:span text:style-name="T1"> </text:span><text:span text:style-name="T2">(69/21) </text:span> ⲡⲃⲁⲡⲧⲓ̣ⲥⲙⲁ ⲛⲉⲩϣⲟⲟⲡ’ ⲉⲩϫ[ⲁ]‐ <text:line-break/><text:span text:style-name="T1"> </text:span><text:span text:style-name="T2">(69/22) </text:span> ϩⲙ̅ ⲕⲉⲟⲩⲁ ⲇⲉ ⲡⲉ ⲡⲃⲁⲡⲧⲓⲥ[ⲙⲁ] <text:line-break/><text:span text:style-name="T1"> </text:span><text:span text:style-name="T2">(69/23) </text:span> ⲛ̅ⲧⲙⲉ· ϩⲓ̅ⲧⲛ̅ ⲧⲁⲡⲟⲧⲁ[ⲅ]ⲏ̣ [ⲙ̅ⲡⲕⲟⲥ]‐ <text:line-break/><text:span text:style-name="T1"> </text:span><text:span text:style-name="T2">(69/24) </text:span> ⲙⲟⲥ ⲉⲩϭⲓⲛⲉ ⲙ̅ⲙⲟϥ· [ⲁⲗⲗⲁ ⲛⲉⲧ’]‐ <text:line-break/><text:span text:style-name="T1"> </text:span><text:span text:style-name="T2">(69/25) </text:span> ϫ̣ⲱ̣ ⲙ̅ⲙⲟⲥ̣ ϩⲙ̅ ⲡⲗⲁ̣ⲥ ⲙ̅ⲙ̣[ⲁⲧⲉ ϫⲉ] <text:line-break/><text:span text:style-name="T1"> </text:span><text:span text:style-name="T2">(69/26) </text:span> [ⲥⲉ]ⲣ̅ⲁⲡⲟⲧⲁⲥⲥⲉ ⲙ̅ⲙ[ⲟϥ· ⲥⲉϫⲓ ϭⲟⲗ] <text:line-break/><text:span text:style-name="T1"> </text:span><text:span text:style-name="T2">(69/27) </text:span> ⲁⲩⲱ ⲥ̣ⲉⲛ̅ⲛⲏⲟⲩ ⲉ̣[ϩ]ⲣ̣ⲁ̣ⲓ̣̈ [ⲉⲡⲙⲁ] <text:line-break/><text:span text:style-name="T1"> </text:span><text:span text:style-name="T2">(69/28) </text:span> ⲛ̅ϩⲣ̅ⲧⲉ· ⲡⲁⲗⲓⲛ ⲟⲛ ⲥⲉⲥⲏ̣ϣ̣ ⲛ̣̅[ϩⲣⲁⲓ̈] <text:line-break/><text:span text:style-name="T1"> </text:span><text:span text:style-name="T2">(69/29) </text:span> ⲛ̅ϩⲏⲧϥ̣̅· ⲕⲁⲧⲁ ⲑⲉ ⲛ̅ⲛⲉⲛ̣ⲧⲁⲩϯ ⲛⲁ̣[ⲩ]‐ <text:line-break/><text:span text:style-name="T1"> </text:span><text:span text:style-name="T2">(69/30) </text:span> ⲉⲁⲩⲣ̅ⲕⲁⲧⲁⲅⲓⲛⲱⲥⲕⲉ ⲙ̅ⲙⲟⲟⲩ <text:line-break/><text:span text:style-name="T1"> </text:span><text:span text:style-name="T2">(69/31) </text:span> [ⲉⲩ]ⲉ̣ϫⲓ̣ ⲗ̣ⲁⲁⲩ· ϣⲁⲩϣ̣ⲱⲡⲉ ⲉⲩ‐ <text:line-break/><text:span text:style-name="T1"> </text:span><text:span text:style-name="T2">(69/32) </text:span> ϩ̣ⲟⲟⲩ ϩⲛ̅ ⲧⲉⲩⲡⲣⲁⲝⲓⲥ· ⲟⲩⲛ̅ ϩⲟ‐ <text:line-break/><text:span text:style-name="T1"> </text:span><text:span text:style-name="T2">(69/33) </text:span> ⲉⲓⲛⲉ ⲇⲉ ⲛ̅ϩⲏⲧⲟⲩ ϣⲁⲩϩⲉ ⲉⲃⲟⲗ <text:line-break/><text:span text:style-name="T1"> </text:span><text:span text:style-name="T2">(70/1) </text:span> [ⲉⲡϣⲙ̅ϣⲉ ⲛ̅]ⲉⲓⲇⲱⲗⲟⲛ· ⲟ[ⲩⲛ̅ ϩⲉⲛ]‐ <text:line-break/><text:span text:style-name="T1"> </text:span><text:span text:style-name="T2">(70/2) </text:span> [ⲕⲟⲟⲩⲉ ⲇⲉ ⲟ]ⲩⲛ̅ⲧⲁⲩ ⲙ̅ⲙⲁⲩ [ⲛ̅ϩⲉⲛ]‐ <text:line-break/><text:soft-page-break/><text:span text:style-name="T1"> </text:span><text:span text:style-name="T2">(70/3) </text:span> [ⲇ]ⲁ̣[ⲓⲙⲱⲛ] ⲉ̣ⲩⲟⲩⲏϩ ⲛⲙ̅ⲙⲁⲩ [ⲛ̅ⲑⲉ]‐ <text:line-break/><text:span text:style-name="T1"> </text:span><text:span text:style-name="T2">(70/4) </text:span> ⲛ̅ⲇ[ⲁⲩⲉ]ⲓ̣ⲇ̓ ⲡⲣ̅ⲣⲟ ⲛ̣̅ⲧⲟϥ ⲡⲉⲛⲧ̣ⲁ[ϥ]‐ <text:line-break/><text:span text:style-name="T1"> </text:span><text:span text:style-name="T2">(70/5) </text:span> ⲥⲙⲛ̣̅ ⲥ̣[ⲛ̅]ⲧⲉ ⲛ̅ⲑ̅[̅ⲓ̅]̅ⲏ̅ⲙ̅ ⲁⲩⲱ ⲡⲉ[ϥϣⲏ] <text:line-break/><text:span text:style-name="T1"> </text:span><text:span text:style-name="T2">(70/6) </text:span> ⲣⲉ ⲥⲟⲗ[ⲟ]ⲙ[ⲱ]ⲛ̣ ⲡⲁⲓ̣̈ [ⲉⲛ]ⲧ̣ⲁϥϫⲡⲟϥ ⲉ̣[ⲃ]ⲟ̣ⲗ̣ <text:line-break/><text:span text:style-name="T1"> </text:span><text:span text:style-name="T2">(70/7) </text:span> ϩⲛ̅ ⲟⲩⲙⲛ̅ⲧ[ⲛⲟⲉⲓⲕ’] ⲛ̣̅ⲧⲟϥ ⲡⲉⲛⲧⲁϥ‐ <text:line-break/><text:span text:style-name="T1"> </text:span><text:span text:style-name="T2">(70/8) </text:span> ⲕⲱⲧ’ ⲛ̅ⲑ̅ⲓ̅ⲏ̅ⲙ̅ [ⲉⲃⲟ]ⲗ̣ ϩⲓ̅ⲧⲛ̅ ⲛ̅ⲇⲁⲓⲙⲱⲛ̣ <text:line-break/><text:span text:style-name="T1"> </text:span><text:span text:style-name="T2">(70/9) </text:span> ⲉⲃⲟ̣ⲗ̣ ϫⲉ ⲁϥϫⲓ ⲛ̅[ⲟⲩϭⲟ]ⲙ̣· ⲛ̅ⲧⲁⲣⲉϥ‐ <text:line-break/><text:span text:style-name="T1"> </text:span><text:span text:style-name="T2">(70/10) </text:span> [ⲟ]ⲩ[ⲱ] ⲇ̣ⲉ ⲉϥ[ⲕⲱⲧ’ ⲁϥⲱⲧ]ⲡ̅ ⲛ̣̅ⲇⲁⲓⲙⲱⲛ <text:line-break/><text:span text:style-name="T1"> </text:span><text:span text:style-name="T2">(70/11) </text:span> [ⲉⲡ]ⲣ̣̅[ⲡ]ⲉ̣ ⲁϥ[ⲕⲁⲁⲩ ⲉϩ]ⲟ̣ⲩⲛ ⲉⲥⲁϣϥⲉ <text:line-break/><text:span text:style-name="T1"> </text:span><text:span text:style-name="T2">(70/12) </text:span> [ⲛ̅ϩⲩⲇⲣ]ⲓ̣ⲁ· ⲁ[ⲩϭⲱ ϩⲛ̅] ⲟ̣ⲩⲛⲟϭ ⲛ̅ⲟⲩⲟ‐ <text:line-break/><text:span text:style-name="T1"> </text:span><text:span text:style-name="T2">(70/13) </text:span> [ⲉⲓϣ ϩ]ⲛ̣̅ ⲛ̅ϩⲩ[ⲇⲣⲓⲁ ⲉⲩ]ⲕ̣ⲏ ⲉϩⲣⲁⲓ̈ ⲙ̅‐ <text:line-break/><text:span text:style-name="T1"> </text:span><text:span text:style-name="T2">(70/14) </text:span> [ⲙⲁⲩ·] ⲛ̅ⲧⲁ̣ⲣ̣ⲟ̣[ⲩⲁⲗ]ⲉ ⲛ̅ϭⲓ ⲛ̅ϩⲣⲱ̣‐ <text:line-break/><text:span text:style-name="T1"> </text:span><text:span text:style-name="T2">(70/15) </text:span> [ⲙ]ⲁⲓⲟⲥ̣ ⲉϩⲣⲁⲓ̈ ⲉ[ⲑ̅ⲓ̅ⲏ̅]̅ⲙ̅ ⲁⲩϭⲱⲗⲉⲡ’ <text:line-break/><text:span text:style-name="T1"> </text:span><text:span text:style-name="T2">(70/16) </text:span> [ⲛ̅]ⲛ̅ϩⲩⲇⲣⲓⲁ· ⲁ[ⲩⲱ] ϩ̣[ⲛ̅ ⲧⲟⲩ]ⲛ̣ⲟⲩ <text:line-break/><text:span text:style-name="T1"> </text:span><text:span text:style-name="T2">(70/17) </text:span> ⲉⲧⲙ̅ⲙⲁⲩ ⲁⲛⲇ[ⲁⲓⲙⲱⲛ] ⲡ̣ⲱⲧ’ <text:line-break/><text:span text:style-name="T1"> </text:span><text:span text:style-name="T2">(70/18) </text:span> ⲉϩⲣⲁⲓ̣̈ ϩⲛ̣̅ ⲛ̅ϩⲩⲇ[ⲣⲓⲁ ⲛ̅]ⲑⲉ ⲛ̅ⲛⲉⲛ‐ <text:line-break/><text:span text:style-name="T1"> </text:span><text:span text:style-name="T2">(70/19) </text:span> ⲧ̣ⲁⲩⲣ̅ ⲃⲟⲗ ϩⲙ̅ ⲡⲉϣⲧⲉⲕⲟ· ⲁⲩⲱ <text:line-break/><text:span text:style-name="T1"> </text:span><text:span text:style-name="T2">(70/20) </text:span> [ⲁ]ⲩ[ϭ]ⲱ̣ ⲛ̅ϭⲓ ⲛ̅ϩⲩⲇⲣⲓⲁ ⲉⲩⲟⲩⲁⲁⲃ· <text:line-break/><text:span text:style-name="T1"> </text:span><text:span text:style-name="T2">(70/21) </text:span> [ⲁⲩ]ⲱ̣ ϫ̣ⲓⲛ ⲛⲉϩⲟⲟⲩ ⲉⲧⲙ̅ⲙⲁⲩ <text:line-break/><text:span text:style-name="T1"> </text:span><text:span text:style-name="T2">(70/22) </text:span> [ⲉⲩⲟⲩⲏϩ] ⲙ̣ⲛ̅ ⲛ̅ⲣⲱⲙⲉ ⲉⲧ’ϣⲟⲟⲡ’ <text:line-break/><text:span text:style-name="T1"> </text:span><text:span text:style-name="T2">(70/23) </text:span> [ϩⲛ̅ ⲟⲩ]ⲙ̣ⲛ̅ⲧ’ⲁⲧ’ⲥⲟⲟⲩ[ⲛ]· ⲁⲩ[ⲱ] <text:line-break/><text:span text:style-name="T1"> </text:span><text:span text:style-name="T2">(70/24) </text:span> [ⲁⲩϭⲱ ϩⲓϫ]ⲙ̅ ⲡⲕⲁϩ· ⲛⲓⲙ ϭⲉ ⲡⲉ <text:line-break/><text:span text:style-name="T1"> </text:span><text:span text:style-name="T2">(70/25) </text:span> [ⲇⲁⲩⲉⲓ]ⲇ̓ ⲏ%0 ⲛ̣ⲓⲙ ⲡ̣ⲉ ⲥⲟⲗⲟⲙⲱⲛ· <text:line-break/><text:span text:style-name="T1"> </text:span><text:span text:style-name="T2">(70/26) </text:span> [ⲏ%0] ⲁ̣ϣ ⲡ̣ⲉ ⲧⲥⲛ̅ⲧⲉ̣· ⲏ%0 ⲁϣ ⲡⲉ ⲡⲥⲟ‐ <text:line-break/><text:span text:style-name="T1"> </text:span><text:span text:style-name="T2">(70/27) </text:span> ⲃⲉⲧ’ ⲉⲧ’ⲕⲱⲧⲉ ⲉⲑ̅ⲓ̅ⲏ̅ⲙ̅· ⲏ%0 ⲛⲓⲙ ⲛ̅‐ <text:line-break/><text:span text:style-name="T1"> </text:span><text:span text:style-name="T2">(70/28) </text:span> ⲧⲟϥ ⲡⲉ ⲛ̅ⲇⲁⲓⲙⲱⲛ· ⲏ%0 ⲁϣ ⲛⲉ̣ ⲛ̣̅‐ <text:line-break/><text:span text:style-name="T1"> </text:span><text:span text:style-name="T2">(70/29) </text:span> ϩⲩⲇⲣⲓⲁ· ⲏ%0 ⲛⲓⲙ ⲛ̅ⲧⲟⲟⲩ ⲛⲉ <text:line-break/><text:span text:style-name="T1"> </text:span><text:span text:style-name="T2">(70/30) </text:span> ⲛ̅ϩⲣⲱⲙⲁⲓⲟⲥ· ⲛⲁⲓ̈ ⲇⲉ ϩⲉⲛⲙⲩ <text:line-break/><text:span text:style-name="T1"> </text:span><text:span text:style-name="T2">(71/5) </text:span> (+-5 lines missing) <text:line-break/><text:span text:style-name="T1"> </text:span><text:span text:style-name="T2">(71/6) </text:span> [.].[ <text:line-break/><text:span text:style-name="T1"> </text:span><text:span text:style-name="T2">(71/7) </text:span> ⲛ̅ⲛ[ <text:line-break/><text:span text:style-name="T1"> </text:span><text:span text:style-name="T2">(71/8) </text:span> ⲛ̅ⲁ[ <text:line-break/><text:span text:style-name="T1"> </text:span><text:span text:style-name="T2">(71/9) </text:span> ⲧ[ <text:line-break/><text:span text:style-name="T1"> </text:span><text:span text:style-name="T2">(71/10) </text:span> ⲡⲉ[ <text:line-break/><text:span text:style-name="T1"> </text:span><text:span text:style-name="T2">(71/11) </text:span> [..].[ <text:line-break/><text:span text:style-name="T1"> </text:span><text:span text:style-name="T2">(71/12) </text:span> ϫⲣⲟ ⲉⲣ[ⲟ%1 8+- ⲡϣⲏⲣⲉ] <text:line-break/><text:span text:style-name="T1"> </text:span><text:span text:style-name="T2">(71/13) </text:span> ⲙ̅ⲡⲣⲱⲙ̣[ⲉ <text:line-break/><text:span text:style-name="T1"> </text:span><text:span text:style-name="T2">(71/14) </text:span> ⲛ̅[..]ⲁⲣ̣.ⲧ̣[ <text:line-break/><text:span text:style-name="T1"> </text:span><text:span text:style-name="T2">(71/15) </text:span> ⲁⲧ’̣ϫ̣[ⲱϩⲙ̅ <text:line-break/><text:span text:style-name="T1"> </text:span><text:span text:style-name="T2">(71/16) </text:span> (1 line missing) <text:line-break/><text:span text:style-name="T1"> </text:span><text:span text:style-name="T2">(71/17) </text:span> ⲙ̣ⲁ̣ⲩ̣ [ⲉ]ⲧⲣⲉ[ <text:line-break/><text:span text:style-name="T1"> </text:span><text:span text:style-name="T2">(71/18) </text:span> ⲁⲩⲱ ⲉϥ[ 12+- ϩⲟ]‐ <text:line-break/><text:span text:style-name="T1"> </text:span><text:span text:style-name="T2">(71/19) </text:span> ⲡ̣ⲟⲧⲉ ⲉϥ.[ <text:line-break/><text:span text:style-name="T1"> </text:span><text:span text:style-name="T2">(71/20) </text:span> ⲟⲩⲛⲟϭ ⲅⲁⲣ ⲡⲉ [ <text:line-break/><text:span text:style-name="T1"> </text:span><text:span text:style-name="T2">(71/21) </text:span> ⲟⲩⲱ ⲧⲡ̣[ <text:line-break/><text:span text:style-name="T1"> </text:span><text:span text:style-name="T2">(71/22) </text:span> ⲉϯⲫ̣ⲩⲥⲓⲥ [ <text:line-break/><text:span text:style-name="T1"> </text:span><text:span text:style-name="T2">(71/23) </text:span> .[..] ⲉ̣ⲧⲉ [ <text:line-break/><text:soft-page-break/><text:span text:style-name="T1"> </text:span><text:span text:style-name="T2">(71/24) </text:span> .ⲣ· ⲛⲉⲧ̣[ <text:line-break/><text:span text:style-name="T1"> </text:span><text:span text:style-name="T2">(71/25) </text:span> ⲧⲏⲣϥ̅ ϩⲛ̅ ⲟ[ⲩ 8+- ⲙⲁ]ⲕ̣ⲁ‐ <text:line-break/><text:span text:style-name="T1"> </text:span><text:span text:style-name="T2">(71/26) </text:span> ⲣⲓⲟⲥ̣ ⲛ̅ⲥⲉⲛ[......ⲛ̅ⲑⲉ ⲛ̅ⲟ]ⲩ‐ <text:line-break/><text:span text:style-name="T1"> </text:span><text:span text:style-name="T2">(71/27) </text:span> ⲥⲁⲗⲁⲙⲁⲛⲇ̣[ⲣⲁ· ϣⲁⲥⲃ]ⲱⲕ’ ⲉϩⲟⲩⲛ <text:line-break/><text:span text:style-name="T1"> </text:span><text:span text:style-name="T2">(71/28) </text:span> ⲉⲧ̣ϩⲣⲱ ⲛ̅ⲕⲱϩⲧ̅’ ⲉ̣[ⲧ’ϫ]ⲉⲣⲟ ⲉⲡⲉ‐ <text:line-break/><text:span text:style-name="T1"> </text:span><text:span text:style-name="T2">(71/29) </text:span> ϩⲟⲩⲟ· ϣⲁⲥⲟϣⲥ̅ ⲉ̣ϩ̣ⲟ̣ⲩⲛ ⲉⲡⲛ̅ <text:line-break/><text:span text:style-name="T1"> </text:span><text:span text:style-name="T2">(72/5) </text:span> (+-5 lines missing) <text:line-break/><text:span text:style-name="T1"> </text:span><text:span text:style-name="T2">(72/6) </text:span> [ 18+- ]ⲁⲧ̣ <text:line-break/><text:span text:style-name="T1"> </text:span><text:span text:style-name="T2">(72/7) </text:span> [ 18+- ]ⲭⲣⲏ <text:line-break/><text:span text:style-name="T1"> </text:span><text:span text:style-name="T2">(72/8) </text:span> [ 18+- ]ⲕⲉ <text:line-break/><text:span text:style-name="T1"> </text:span><text:span text:style-name="T2">(72/9) </text:span> [ 17+- ]. ϩⲛ̅ <text:line-break/><text:span text:style-name="T1"> </text:span><text:span text:style-name="T2">(72/10) </text:span> [ 18+- ]ⲓ̣ⲏ <text:line-break/><text:span text:style-name="T1"> </text:span><text:span text:style-name="T2">(72/11) </text:span> [ 16+- ]ⲉⲛⲧ. <text:line-break/><text:span text:style-name="T1"> </text:span><text:span text:style-name="T2">(72/12) </text:span> [ 15+- ]ϣⲏ ⲙⲛ̅ <text:line-break/><text:span text:style-name="T1"> </text:span><text:span text:style-name="T2">(72/13) </text:span> [ 13+- ]ⲁⲛ ⲛ̣[ <text:line-break/><text:span text:style-name="T1"> </text:span><text:span text:style-name="T2">(72/14) </text:span> [ 13+- ⲡⲛ̅]ⲧ̣ⲱ̣ⲕ <text:line-break/><text:span text:style-name="T1"> </text:span><text:span text:style-name="T2">(72/15) </text:span> (1 line missing) <text:line-break/><text:span text:style-name="T1"> </text:span><text:span text:style-name="T2">(72/16) </text:span> [ 14+- ]ⲛϩⲣⲱϫⲉ <text:line-break/><text:span text:style-name="T1"> </text:span><text:span text:style-name="T2">(72/17) </text:span> [ 13+- ]ⲙ̣ ⲉⲩⲉⲛⲁⲩ <text:line-break/><text:span text:style-name="T1"> </text:span><text:span text:style-name="T2">(72/18) </text:span> [ 14+- ] ⲙ̣ⲛ̅ ⲡϫⲓⲛ· <text:line-break/><text:span text:style-name="T1"> </text:span><text:span text:style-name="T2">(72/19) </text:span> [ 9+- ⲑ]ⲩ̣ⲥ̣ⲓⲁ· ⲛ̣ⲁ̣ϣⲉ ⲑⲩ <text:line-break/><text:span text:style-name="T1"> </text:span><text:span text:style-name="T2">(72/20) </text:span> [ⲥⲓⲁ 11+- ] ⲛ̅ⲟ[ⲩ]ⲁ̣ ⲙ̅ <text:line-break/><text:span text:style-name="T1"> </text:span><text:span text:style-name="T2">(72/21) </text:span> [ 14+- ]ⲙ ⲛ̅ⲧ̣[..]ⲉ <text:line-break/><text:span text:style-name="T1"> </text:span><text:span text:style-name="T2">(72/22) </text:span> [ 12+- ⲁⲗ]ⲗⲁ ϩⲛ̅ ⲟⲩ <text:line-break/><text:span text:style-name="T1"> </text:span><text:span text:style-name="T2">(72/23) </text:span> [ 14+- ]. ⲉⲩⲥⲁ <text:line-break/><text:span text:style-name="T1"> </text:span><text:span text:style-name="T2">(72/24) </text:span> ⲛ̣[ 12+- ]ⲩ· ⲁⲩⲱ <text:line-break/><text:span text:style-name="T1"> </text:span><text:span text:style-name="T2">(72/25) </text:span> ϥ.[...]. [ⲛ̅ϭⲓ ⲡϣⲏⲣ]ⲉ ⲙ̅ⲡⲣⲱ‐ <text:line-break/><text:span text:style-name="T1"> </text:span><text:span text:style-name="T2">(72/26) </text:span> ⲙⲉ· ⲁⲩ[ⲱ ⲁϥⲟ]ⲩⲱⲛϩ̅ ⲉⲃⲟⲗ ϩⲓ̅ⲧ̣ⲛ̣̅ <text:line-break/><text:span text:style-name="T1"> </text:span><text:span text:style-name="T2">(72/27) </text:span> ⲧⲡⲏⲅⲏ ⲛ̅[ⲁⲧ]ⲙⲟⲩ ⲉⲥⲃⲉⲉⲃⲉ <text:line-break/><text:span text:style-name="T1"> </text:span><text:span text:style-name="T2">(73/1) </text:span> [ 9+- ]ⲙⲁ⟦ϥ⟧ⲕⲓ̣[.....]ⲧⲟⲥ <text:line-break/><text:span text:style-name="T1"> </text:span><text:span text:style-name="T2">(73/2) </text:span> [ 9+- ] ⲟⲩⲕⲁⲑ̣ⲁ̣ⲣ̣[ⲟⲥ] ⲡⲉ· <text:line-break/><text:span text:style-name="T1"> </text:span><text:span text:style-name="T2">(73/3) </text:span> [.....].ⲙ ⲇ[ⲉ] ⲡ̣ⲉ· ⲟⲩⲉⲗ[ⲉⲩ]ⲑⲉⲣⲟⲥ <text:line-break/><text:span text:style-name="T1"> </text:span><text:span text:style-name="T2">(73/4) </text:span> [ⲇⲉ] ⲙ̣ⲁϥ[ⲣ̅]ⲫⲑ[ⲟ]ⲛⲓ· ϥ̣ⲡⲟⲣϣ̅ [ⲉⲃ]ⲟⲗ ⲛ̅‐ <text:line-break/><text:span text:style-name="T1"> </text:span><text:span text:style-name="T2">(73/5) </text:span> [ⲟⲩ]ⲟⲛ ⲛⲓⲙ ⲉⲃⲟⲗ ⲛ̣̅ⲧⲟⲗ̣[ⲙⲁ ⲛⲓⲙ ϩⲓ̅] ⲫⲑⲟ‐ <text:line-break/><text:span text:style-name="T1"> </text:span><text:span text:style-name="T2">(73/6) </text:span> [ⲛⲟ]ⲥ ⲉⲛⲁϣⲉ ⲧⲟ̣[ⲩϭⲟⲙ..].ⲙ̣ ⲟ͂ <text:line-break/><text:span text:style-name="T1"> </text:span><text:span text:style-name="T2">(73/7) </text:span> ⲙ̣̅[ⲙ]ⲁ̣ⲑⲏⲧⲏⲥ .[ 7+- ]ⲡ̣· ⲛ̅‐ <text:line-break/><text:span text:style-name="T1"> </text:span><text:span text:style-name="T2">(73/8) </text:span> ⲥⲙⲟⲧ’ ⲛ̅ⲛ̣ⲟⲙ̣ⲟ̣[ⲥ <text:line-break/><text:span text:style-name="T1"> </text:span><text:span text:style-name="T2">(73/9) </text:span> ⲛⲁⲓ̈ ⲉ̣ⲩ.[ <text:line-break/><text:span text:style-name="T1"> </text:span><text:span text:style-name="T2">(73/10) </text:span> ⲙⲟ[ⲛⲟ]ⲛ̣ [ <text:line-break/><text:span text:style-name="T1"> </text:span><text:span text:style-name="T2">(73/11) </text:span> [ 18+- ]. <text:line-break/><text:span text:style-name="T1"> </text:span><text:span text:style-name="T2">(73/12) </text:span> [ 17+- ]ⲧ̣ⲉ <text:line-break/><text:span text:style-name="T1"> </text:span><text:span text:style-name="T2">(73/13) </text:span> [...].ⲉ[ 11+- ] ⲁ̣ⲩⲕⲱ <text:line-break/><text:span text:style-name="T1"> </text:span><text:span text:style-name="T2">(73/14) </text:span> [ⲙ̅]ⲙ̣ⲟϥ ϩⲁⲟⲩ[ 9+- ]..[ <text:line-break/><text:span text:style-name="T1"> </text:span><text:span text:style-name="T2">(73/15) </text:span> [....]ⲟⲩⲥⲃⲱ [ <text:line-break/><text:span text:style-name="T1"> </text:span><text:span text:style-name="T2">(73/16) </text:span> [ 10+- ]ⲛ̣ⲉ̣[ <text:line-break/><text:span text:style-name="T1"> </text:span><text:span text:style-name="T2">(73/17) </text:span> [.....]ⲣ̣[.....] ⲉ[ⲧⲉ]ϥⲥⲃ[ⲱ·] <text:line-break/><text:span text:style-name="T1"> </text:span><text:span text:style-name="T2">(73/18) </text:span> [ⲉ]ⲩϫⲱ̣ ⲙ̅ⲙⲟ̣[ⲥ ϫⲉ ⲕ]ⲁⲛ ⲉⲩⲁⲅ’̣[ⲅⲉⲗⲟⲥ] <text:line-break/><text:soft-page-break/><text:span text:style-name="T1"> </text:span><text:span text:style-name="T2">(73/19) </text:span> {ⲉ̅ⲓ} ⲉⲃⲟⲗ ϩⲛ̅ ⲧⲡ̣ⲉ̣ ⲛ̅ϥⲧⲁϣ[ⲉ ⲟⲉⲓϣ] <text:line-break/><text:span text:style-name="T1"> </text:span><text:span text:style-name="T2">(73/20) </text:span> ⲛⲏⲧⲛ̅ ⲡⲁⲣⲁ ⲡⲉⲛⲧⲁⲛⲧⲁϣⲉ ⲟ̣[ⲉⲓϣ] <text:line-break/><text:span text:style-name="T1"> </text:span><text:span text:style-name="T2">(73/21) </text:span> ⲙ̣̅ⲙⲟϥ ⲛⲏⲧⲛ̅ ⲙⲁⲣⲉϥϣⲱ[ⲡⲉ ⲉϥ]‐ <text:line-break/><text:span text:style-name="T1"> </text:span><text:span text:style-name="T2">(73/22) </text:span> ϥⲏⲧ’· ⲉⲛⲥⲉⲕⲱ ⲁⲛ ⲛ̅ⲛ̣[ <text:line-break/><text:span text:style-name="T1"> </text:span><text:span text:style-name="T2">(73/23) </text:span> ⲙ̅ⲯⲩ[ⲭ]ⲏ ⲉⲧⲉ̣[.].ⲛ[..]ϩ̣.[ <text:line-break/><text:span text:style-name="T1"> </text:span><text:span text:style-name="T2">(73/24) </text:span> [...]ⲉ̣ⲗⲉⲩⲑⲉⲣⲓ̣ⲁ̣ [ <text:line-break/><text:span text:style-name="T1"> </text:span><text:span text:style-name="T2">(73/25) </text:span> ϫⲉ ⲉⲧⲓ ⲥⲉⲥⲟⲃⲉ̣ⲕ̣ .[ <text:line-break/><text:span text:style-name="T1"> </text:span><text:span text:style-name="T2">(73/26) </text:span> ⲙⲛ̅ϭⲟⲙ ⲙ̅ⲙⲟⲟⲩ ⲉⲣ̅ⲧ[ⲏⲣⲉⲓ ⲙ̅]‐ <text:line-break/><text:span text:style-name="T1"> </text:span><text:span text:style-name="T2">(73/27) </text:span> ⲡⲛⲟ̣ⲙⲟⲥ ⲡⲁⲓ̈ [ⲉ]ⲧⲉⲛⲉⲣⲅⲉⲓ <text:line-break/><text:span text:style-name="T1"> </text:span><text:span text:style-name="T2">(73/28) </text:span> ⲉⲃⲟⲗ ϩⲓ̅ⲧⲟⲟⲧⲟⲩ ⲛ̅ⲛⲓϩⲉⲣⲉⲥⲓⲥ· <text:line-break/><text:span text:style-name="T1"> </text:span><text:span text:style-name="T2">(73/29) </text:span> ⲛ̅ⲧ̣[ⲟ]ⲟⲩ ⲇ̣ⲉ̣ ⲁⲛ ⲡⲉ· ⲁⲗⲗⲁ ⲛ̅ⲇⲩ‐ <text:line-break/><text:span text:style-name="T1"> </text:span><text:span text:style-name="T2">(73/30) </text:span> ⲛⲁⲙⲓⲥ ⲛⲉ ⲛ̅ⲥ̅ⲁ̅ⲃ̅ⲁ̅ⲱ̅ⲑ̅· ⲉⲃⲟⲗ <text:line-break/><text:span text:style-name="T1"> </text:span><text:span text:style-name="T2">(74/1) </text:span> ϩ̣[ⲓ̅]ⲧⲟ̣[ⲟⲧⲟⲩ] ⲛ̣ⲙ̣̅ⲙ[ <text:line-break/><text:span text:style-name="T1"> </text:span><text:span text:style-name="T2">(74/2) </text:span> .ⲉⲣⲟ[.....] ⲛ̅ⲥⲃⲟ[ⲟⲩⲉ <text:line-break/><text:span text:style-name="T1"> </text:span><text:span text:style-name="T2">(74/3) </text:span> ⲉⲁⲩⲕ̣[ⲱ]ϩ̣ [ⲉ]ϫ̣ⲛ̅ ϩⲉⲛ[..]..[ <text:line-break/><text:span text:style-name="T1"> </text:span><text:span text:style-name="T2">(74/4) </text:span> ⲛⲟⲙ[ⲟⲥ] ϩ̣ⲙ̅ ⲡ̣ⲉ̣ⲭ̣̅̅ⲥ̣̅̅· ⲛ̣[ⲉ]ⲧⲛ̣ⲁ̣..[ <text:line-break/><text:span text:style-name="T1"> </text:span><text:span text:style-name="T2">(74/5) </text:span> ϭ̣ⲟ̣ⲙ [.]. ⲥⲉϫ̣ⲱⲃ̣ⲉ ⲛ̅ⲛ̅ⲥⲱⲙ̣[.].[ <text:line-break/><text:span text:style-name="T1"> </text:span><text:span text:style-name="T2">(74/6) </text:span> ⲁ̣ⲩ[ 9+- ] ⲉⲧⲙⲛ̅ⲧ’ⲥⲛⲟ̣[ⲟⲩⲥⲉ] <text:line-break/><text:span text:style-name="T1"> </text:span><text:span text:style-name="T2">(74/7) </text:span> ⲣ̣̅ⲕⲣⲓ̣ⲛ̣[ⲉ......].ⲱⲉ[.]ⲛ̣ ⲙ̣̅ⲙⲟⲟⲩ <text:line-break/><text:span text:style-name="T1"> </text:span><text:span text:style-name="T2">(74/8) </text:span> [.]ϫ̣ⲱ̣.[ 7+- ].[.]ⲛ̣ ⲛ̣̅ⲧⲡⲏⲅ̣ⲏ ⲛ̅‐ <text:line-break/><text:span text:style-name="T1"> </text:span><text:span text:style-name="T2">(74/9) </text:span> [ⲁⲧⲙⲟⲩ 10+- ]ⲧⲉ̣[..]. <text:line-break/><text:span text:style-name="T1"> </text:span><text:span text:style-name="T2">(74/10) </text:span> (2 lines missing) <text:line-break/><text:span text:style-name="T1"> </text:span><text:span text:style-name="T2">(74/12) </text:span> ⲙⲉ[ <text:line-break/><text:span text:style-name="T1"> </text:span><text:span text:style-name="T2">(74/13) </text:span> ϫⲉⲕⲁ̣[ⲁⲥ 11+- ]ⲧⲉ[ <text:line-break/><text:span text:style-name="T1"> </text:span><text:span text:style-name="T2">(74/14) </text:span> .ϯⲉ̣[ 9+- ]ⲁ̣ ⲧⲙⲛ̅ⲧ’.[ <text:line-break/><text:span text:style-name="T1"> </text:span><text:span text:style-name="T2">(74/15) </text:span> [ 10+- ]ⲙⲁ[ <text:line-break/><text:span text:style-name="T1"> </text:span><text:span text:style-name="T2">(74/16) </text:span> [......]ϩ̣[ <text:line-break/><text:span text:style-name="T1"> </text:span><text:span text:style-name="T2">(74/17) </text:span> [..]ⲁⲣ[.].ⲉ[.....ⲛ]ⲁ̣ⲛ̣ⲟ[ⲩ]ϥ̣ ⲉ[ <text:line-break/><text:span text:style-name="T1"> </text:span><text:span text:style-name="T2">(74/18) </text:span> [....]....[....]ⲩ̣ ⲙ̅ⲡⲙ̣ⲁ̣ ⲧⲏⲣ[ϥ̅] <text:line-break/><text:span text:style-name="T1"> </text:span><text:span text:style-name="T2">(74/19) </text:span> [....].ϥ̣..ⲁ̣ⲩ̣ ⲙ̣̅ⲙⲁⲩ ⲛ̅ϫⲁϫⲉ <text:line-break/><text:span text:style-name="T1"> </text:span><text:span text:style-name="T2">(74/20) </text:span> [ⲁ]ϥ̣ⲣ̣̅ⲃ̣ⲁⲡ̣ⲧ̣ⲓⲍⲉ ⲙ̅ⲙⲟϥ ⲁⲩⲱ ⲡⲙⲉ̣ <text:line-break/><text:span text:style-name="T1"> </text:span><text:span text:style-name="T2">(74/21) </text:span> [....]ⲙ̣[.]ⲁ̣ⲧ̣ⲉ̣ ⲁ̣ϥⲣ̅ⲛⲟⲩⲧⲉ ⲁϥϩⲱⲗ̣ <text:line-break/><text:span text:style-name="T1"> </text:span><text:span text:style-name="T2">(74/22) </text:span> [ⲉϩⲣⲁⲓ̈] ⲙ̣̅ⲡⲟⲩⲁⲙⲁϩⲧⲉ ⲙ̅ⲙⲟϥ· <text:line-break/><text:span text:style-name="T1"> </text:span><text:span text:style-name="T2">(74/23) </text:span> [......].[..]ⲩ ⲙ̅ⲙⲁⲩ ⲛ̣̅ϫ̣ⲁ̣[ϫⲉ·] <text:line-break/><text:span text:style-name="T1"> </text:span><text:span text:style-name="T2">(74/24) </text:span> [ 9+- ]ⲣ̣ϥ̅ ⲉⲙⲛ̅ϭⲟⲙ· <text:line-break/><text:span text:style-name="T1"> </text:span><text:span text:style-name="T2">(74/25) </text:span> [ⲉⲧⲣⲉⲩⲛ̅]ⲧ̣ϥ̣̅ ⲉⲡⲓⲧⲛ̅ ⲛ̅ⲕⲉⲥⲟⲡ’ <text:line-break/><text:span text:style-name="T1"> </text:span><text:span text:style-name="T2">(74/26) </text:span> [.....]ⲉ̣ ⲛⲓⲙ ⲉⲩⲁⲙⲁ[ϩ]ⲧ̣ⲉ̣ ⲙ̣̅ⲙ̣ⲟϥ <text:line-break/><text:span text:style-name="T1"> </text:span><text:span text:style-name="T2">(74/27) </text:span> [ϩⲛ̅ ⲧ]ⲙⲛ̅ⲧ’ⲁⲧ’ⲥⲟⲟⲩⲛ ⲉⲩⲣ̅ⲡⲣⲟⲥ‐ <text:line-break/><text:span text:style-name="T1"> </text:span><text:span text:style-name="T2">(74/28) </text:span> ⲉ̣[ⲭⲉ] ⲉⲛⲉⲧ’ϯ ⲥⲃⲱ ϩⲛ̅ ⲛ̅ⲕⲗ̅ϫⲉ <text:line-break/><text:span text:style-name="T1"> </text:span><text:span text:style-name="T2">(74/29) </text:span> ϩⲓ̅ⲧⲛ̣̅ ϩⲉⲛϣⲟϫⲧ̅’ ⲙⲛ̣̅ ϩ̣ⲉ̣ⲛ̣ⲕ̣ⲟⲧⲥ̅ <text:line-break/><text:span text:style-name="T1"> </text:span><text:span text:style-name="T2">(74/30) </text:span> ⲛ̅ⲧⲉⲭⲛⲏ̣· ⲉⲩⲛⲁϣϭⲙ̅ϭⲟⲙ ⲁ̣ⲛ <text:line-break/><text:span text:style-name="T1"> </text:span><text:span text:style-name="T2">(74/31) </text:span> (2) 1· .[ <text:line-break/><text:span text:style-name="T1"> </text:span><text:span text:style-name="T2">(74/32) </text:span> ⲛ̅[ <text:line-break/><text:span text:style-name="T1"> </text:span><text:span text:style-name="T2">(74/33) </text:span> ⲫ[ <text:line-break/><text:span text:style-name="T1"> </text:span><text:span text:style-name="T2">(74/34) </text:span> .[ <text:line-break/><text:span text:style-name="T1"> </text:span><text:span text:style-name="T2">(74/35) </text:span> (2) 2· ]. <text:line-break/><text:span text:style-name="T1"> </text:span><text:span text:style-name="T2">(74/36) </text:span> ]ⲧⲉ <text:line-break/><text:soft-page-break/><text:span text:style-name="T1"> </text:span><text:span text:style-name="T2">(74/37) </text:span> ]ⲙ̅ <text:line-break/><text:span text:style-name="T1"> </text:span><text:span text:style-name="T2">(74/38) </text:span> ]ⲛⲧ̅’ <text:line-break/><text:span text:style-name="T1"> </text:span><text:span text:style-name="T2">(74/39) </text:span> (3) 1· ]ⲙⲟⲛ· ⲛⲛ̣[ <text:line-break/><text:span text:style-name="T1"> </text:span><text:span text:style-name="T2">(74/40) </text:span> ]ⲛ̣ⲁⲕ’ ⲙ̣ⲛ̣̅[ <text:line-break/><text:span text:style-name="T1"> </text:span><text:span text:style-name="T2">(74/41) </text:span> (3) 2· ]ⲙ̣ⲉ[ <text:line-break/><text:span text:style-name="T1"> </text:span><text:span text:style-name="T2">(74/42) </text:span> ]ⲩ· ⲡⲁⲅ’ⲅ̣[ⲉⲗⲟⲥ <text:line-break/><text:span text:style-name="T1"> </text:span><text:span text:style-name="T2">(74/43) </text:span> ].ⲛ·[ <text:line-break/><text:span text:style-name="T1"> </text:span><text:span text:style-name="T2">(74/44) </text:span> (4) 1· ⲟⲩⲁ]ⲁ̣ⲃ ⲛ[ <text:line-break/><text:span text:style-name="T1"> </text:span><text:span text:style-name="T2">(74/45) </text:span> ⲡ]ⲱ̣ⲛϩ̅· ⲡϣ̣[ <text:line-break/><text:span text:style-name="T1"> </text:span><text:span text:style-name="T2">(74/46) </text:span> ]. ⲡⲱ̣ⲛϩ̅ [ <text:line-break/><text:span text:style-name="T1"> </text:span><text:span text:style-name="T2">(74/47) </text:span> (4) 2· ].[ <text:line-break/><text:span text:style-name="T1"> </text:span><text:span text:style-name="T2">(74/48) </text:span> ⲟⲩ]ⲕⲉⲧⲓ ⲡ̣[ <text:line-break/><text:span text:style-name="T1"> </text:span><text:span text:style-name="T2">(74/49) </text:span> ]ⲛⲁⲙⲟⲩ [ <text:line-break/><text:span text:style-name="T1"> </text:span><text:span text:style-name="T2">(74/50) </text:span> (5) 1· ].[....].[ <text:line-break/><text:span text:style-name="T1"> </text:span><text:span text:style-name="T2">(74/51) </text:span> ].. ⲛ̅ⲧⲁ̣.[ <text:line-break/><text:span text:style-name="T1"> </text:span><text:span text:style-name="T2">(74/52) </text:span> ]ⲃ̣ⲛ[ <text:line-break/><text:span text:style-name="T1"> </text:span><text:span text:style-name="T2">(74/53) </text:span> (5) 2· ]ⲛ̣[ <text:line-break/><text:span text:style-name="T1"> </text:span><text:span text:style-name="T2">(74/54) </text:span> ⲟ]ⲥ ⲛ̣̅ϣⲟⲣⲡ̅ [ <text:line-break/><text:span text:style-name="T1"> </text:span><text:span text:style-name="T2">(74/55) </text:span> ].[.]ⲧ̣ⲉϥ[ <text:line-break/><text:span text:style-name="T1"> </text:span><text:span text:style-name="T2">(74/56) </text:span> (6) 1· ]ⲉⲡ[ <text:line-break/><text:span text:style-name="T1"> </text:span><text:span text:style-name="T2">(74/57) </text:span> ]ⲥⲟⲟ̣[ <text:line-break/><text:span text:style-name="T1"> </text:span><text:span text:style-name="T2">(74/58) </text:span> ].ⲁ̣.[ <text:line-break/><text:span text:style-name="T1"> </text:span><text:span text:style-name="T2">(74/59) </text:span> (6) 2· ]ⲁⲛ.[ <text:line-break/><text:span text:style-name="T1"> </text:span><text:span text:style-name="T2">(74/60) </text:span> ]ϭⲙ̅ϭ[ⲟⲙ <text:line-break/><text:span text:style-name="T1"> </text:span><text:span text:style-name="T2">(74/61) </text:span> ]..[ <text:line-break/><text:span text:style-name="T1"> </text:span><text:span text:style-name="T2">(74/62) </text:span> (9) 1· ⲛ̅ⲧ̣[ <text:line-break/><text:span text:style-name="T1"> </text:span><text:span text:style-name="T2">(74/63) </text:span> ⲣⲉ[ <text:line-break/><text:span text:style-name="T1"> </text:span><text:span text:style-name="T2">(74/64) </text:span> ϣ[ <text:line-break/><text:span text:style-name="T1"> </text:span><text:span text:style-name="T2">(74/65) </text:span> ⲧ.[ <text:line-break/><text:span text:style-name="T1"> </text:span><text:span text:style-name="T2">(74/66) </text:span> ⲛ̅ⲣ[ <text:line-break/><text:span text:style-name="T1"> </text:span><text:span text:style-name="T2">(74/67) </text:span> ⲑⲣ[ <text:line-break/><text:span text:style-name="T1"> </text:span><text:span text:style-name="T2">(74/68) </text:span> ⲟ[ <text:line-break/><text:span text:style-name="T1"> </text:span><text:span text:style-name="T2">(74/69) </text:span> ⲓ̣ⲁ[ <text:line-break/><text:span text:style-name="T1"> </text:span><text:span text:style-name="T2">(74/70) </text:span> (9) 2· ]ⲡⲟⲩ <text:line-break/><text:span text:style-name="T1"> </text:span><text:span text:style-name="T2">(74/71) </text:span> ]ⲩ· <text:line-break/><text:span text:style-name="T1"> </text:span><text:span text:style-name="T2">(74/72) </text:span> ].ⲉ <text:line-break/><text:span text:style-name="T1"> </text:span><text:span text:style-name="T2">(74/73) </text:span> ]ⲁ̣ⲛ <text:line-break/><text:span text:style-name="T1"> </text:span><text:span text:style-name="T2">(74/74) </text:span> ]ⲩ <text:line-break/><text:span text:style-name="T1"> </text:span><text:span text:style-name="T2">(74/75) </text:span> ] ⲁⲩⲱ <text:line-break/><text:span text:style-name="T1"> </text:span><text:span text:style-name="T2">(74/76) </text:span> ]ⲟⲗ <text:line-break/><text:span text:style-name="T1"> </text:span><text:span text:style-name="T2">(74/77) </text:span> ] ϩⲛ̅ <text:line-break/><text:span text:style-name="T1"> </text:span><text:span text:style-name="T2">(74/78) </text:span> ]ⲛ <text:line-break/><text:span text:style-name="T1"> </text:span><text:span text:style-name="T2">(74/79) </text:span> ]ⲩ <text:line-break/><text:span text:style-name="T1"> </text:span><text:span text:style-name="T2">(74/80) </text:span> (10) 1· Blank <text:line-break/><text:span text:style-name="T1"> </text:span><text:span text:style-name="T2">(74/81) </text:span> (10) 2· ].ⲛ̅ⲓ̈ⲱ̣. <text:line-break/><text:span text:style-name="T1"> </text:span><text:span text:style-name="T2">(74/82) </text:span> ]ϯ..[ <text:line-break/><text:span text:style-name="T1"> </text:span><text:span text:style-name="T2">(74/83) </text:span> (11) 1· ]ⲉ̣[..]ⲯ[ <text:line-break/><text:soft-page-break/><text:span text:style-name="T1"> </text:span><text:span text:style-name="T2">(74/84) </text:span> ].ⲛ̣ⲁ̣ⲣ̣.[ <text:line-break/><text:span text:style-name="T1"> </text:span><text:span text:style-name="T2">(74/85) </text:span> (11) 2· ]ϥⲙⲱ[ <text:line-break/><text:span text:style-name="T1"> </text:span><text:span text:style-name="T2">(74/86) </text:span> (12) 1· ]ⲉⲛ[ <text:line-break/><text:span text:style-name="T1"> </text:span><text:span text:style-name="T2">(74/87) </text:span> ]ⲙⲉ ⲣ̅[ <text:line-break/><text:span text:style-name="T1"> </text:span><text:span text:style-name="T2">(74/88) </text:span> (12) 2· ]ϣⲓⲛ̣[ <text:line-break/><text:span text:style-name="T1"> </text:span><text:span text:style-name="T2">(74/89) </text:span> ]ⲧ̣ⲟⲛ .[ <text:line-break/><text:span text:style-name="T1"> </text:span><text:span text:style-name="T2">(74/90) </text:span> ]ⲛ̣ⲧ̅’̣ [ <text:line-break/><text:span text:style-name="T1"> </text:span><text:span text:style-name="T2">(74/91) </text:span> (13) 1· ]ⲁϩⲟⲩ[ <text:line-break/><text:span text:style-name="T1"> </text:span><text:span text:style-name="T2">(74/92) </text:span> ].ⲡ̣[ <text:line-break/><text:span text:style-name="T1"> </text:span><text:span text:style-name="T2">(74/93) </text:span> (13) 2· ].ⲟⲩⲧ̣[ <text:line-break/><text:span text:style-name="T1"> </text:span><text:span text:style-name="T2">(74/94) </text:span> (20) 1· ]ⲁ̣ⲓϫ̣[ <text:line-break/><text:span text:style-name="T1"> </text:span><text:span text:style-name="T2">(74/95) </text:span> ].ⲧⲏ̣[ <text:line-break/><text:span text:style-name="T1"> </text:span><text:span text:style-name="T2">(74/96) </text:span> (20) 2· ⲛⲉⲡⲣ̣[ <text:line-break/><text:span text:style-name="T1"> </text:span><text:span text:style-name="T2">(74/97) </text:span> ]ⲛ̣ⲟ̣ⲩ[ <text:line-break/><text:span text:style-name="T1"> </text:span><text:span text:style-name="T2">(74/98) </text:span> (22) 1· ]ⲛ̣[ <text:line-break/><text:span text:style-name="T1"> </text:span><text:span text:style-name="T2">(74/99) </text:span> ]ⲗ̣[ <text:line-break/><text:span text:style-name="T1"> </text:span><text:span text:style-name="T2">(74/100) </text:span> ].ⲁⲛ̣.[ <text:line-break/><text:span text:style-name="T1"> </text:span><text:span text:style-name="T2">(74/101) </text:span> (22) 2· ].[ <text:line-break/><text:span text:style-name="T1"> </text:span><text:span text:style-name="T2">(74/102) </text:span> ]ⲛ̅ⲣ[ <text:line-break/><text:span text:style-name="T1"> </text:span><text:span text:style-name="T2">(74/103) </text:span> ]ⲙ̅ⲡⲣ̣[ <text:line-break/><text:span text:style-name="T1"> </text:span><text:span text:style-name="T2">(74/104) </text:span> ]ⲟ̣[ <text:line-break/><text:span text:style-name="T1"> </text:span><text:span text:style-name="T2">(74/105) </text:span> (23) 1· ]ϩⲙ̅[ <text:line-break/><text:span text:style-name="T1"> </text:span><text:span text:style-name="T2">(74/106) </text:span> ]ϣⲓ̣[ <text:line-break/><text:span text:style-name="T1"> </text:span><text:span text:style-name="T2">(74/107) </text:span> (23) 2· ].ⲧ[ <text:line-break/><text:span text:style-name="T1"> </text:span><text:span text:style-name="T2">(74/108) </text:span> ]ⲉ̅ ⲧⲁ̣[ <text:line-break/><text:span text:style-name="T1"> </text:span><text:span text:style-name="T2">(74/109) </text:span> ]. ⲛ̅[ <text:line-break/><text:span text:style-name="T1"> </text:span><text:span text:style-name="T2">(74/110) </text:span> (32) 1· ].[ <text:line-break/><text:span text:style-name="T1"> </text:span><text:span text:style-name="T2">(74/111) </text:span> ]ⲁϩⲛ[ <text:line-break/><text:span text:style-name="T1"> </text:span><text:span text:style-name="T2">(74/112) </text:span> ]ⲟ..[ <text:line-break/><text:span text:style-name="T1"> </text:span><text:span text:style-name="T2">(74/113) </text:span> (32) 2· ]ⲁ̣[ <text:line-break/><text:span text:style-name="T1"> </text:span><text:span text:style-name="T2">(74/114) </text:span> ]ⲁϥⲉ.[ <text:line-break/><text:span text:style-name="T1"> </text:span><text:span text:style-name="T2">(74/115) </text:span> ]..[ <text:line-break/><text:span text:style-name="T1"> </text:span><text:span text:style-name="T2">(74/116) </text:span> (37) 1· ]ⲩⲧ̣[ <text:line-break/><text:span text:style-name="T1"> </text:span><text:span text:style-name="T2">(74/117) </text:span> ]ⲧⲥ̣[ <text:line-break/><text:span text:style-name="T1"> </text:span><text:span text:style-name="T2">(74/118) </text:span> ]ⲡⲉ[ <text:line-break/><text:span text:style-name="T1"> </text:span><text:span text:style-name="T2">(74/119) </text:span> (37) 2· ]ⲑⲉ [ <text:line-break/><text:span text:style-name="T1"> </text:span><text:span text:style-name="T2">(74/120) </text:span> ]ϩⲛ̣̅[ <text:line-break/><text:span text:style-name="T1"> </text:span><text:span text:style-name="T2">(74/121) </text:span> ].ⲧⲉ̣[ <text:line-break/><text:span text:style-name="T1"> </text:span><text:span text:style-name="T2">(74/122) </text:span> (72) 1· ]ϫ̣ⲛ̣· ⲧ̣ⲁ̣ⲓ̣.[ <text:line-break/><text:span text:style-name="T1"> </text:span><text:span text:style-name="T2">(74/123) </text:span> ]..ⲛ̣̅ⲛ̣ⲏ.[ <text:line-break/><text:span text:style-name="T1"> </text:span><text:span text:style-name="T2">(74/124) </text:span> ]ⲡ̣ⲧ̣ⲏ̣ⲣ̣[ϥ̅ <text:line-break/><text:span text:style-name="T1"> </text:span><text:span text:style-name="T2">(74/125) </text:span> (72) 2· ]...[ <text:line-break/><text:span text:style-name="T1"> </text:span><text:span text:style-name="T2">(74/126) </text:span> ]. ⲛ̅ϣⲟ ϣ.[ <text:line-break/><text:span text:style-name="T1"> </text:span><text:span text:style-name="T2">(74/127) </text:span> ]ⲟⲩⲉ ⲛ̅.[ <text:line-break/><text:span text:style-name="T1"> </text:span><text:span text:style-name="T2">(74/128) </text:span> (73) 1· ]...[ <text:line-break/><text:span text:style-name="T1"> </text:span><text:span text:style-name="T2">(74/129) </text:span> ]ϣ̣ⲡ̣ⲟ[ <text:line-break/><text:span text:style-name="T1"> </text:span><text:span text:style-name="T2">(74/130) </text:span> ]ⲥ̣ⲃⲱ ⲛ[ <text:line-break/><text:soft-page-break/><text:span text:style-name="T1"> </text:span><text:span text:style-name="T2">(74/131) </text:span> ] ⲛⲁⲓ̈ [ <text:line-break/><text:span text:style-name="T1"> </text:span><text:span text:style-name="T2">(74/132) </text:span> (73) 2· ]..[ <text:line-break/><text:span text:style-name="T1"> </text:span><text:span text:style-name="T2">(74/133) </text:span> ]ϫ̣..[ <text:line-break/><text:span text:style-name="T1"> </text:span><text:span text:style-name="T2">(74/134) </text:span> ]ⲉϥⲛ[ <text:line-break/><text:span text:style-name="T1"> </text:span><text:span text:style-name="T2">(74/135) </text:span> ]ⲧ̣[ <text:line-break/><text:span text:style-name="T1"> </text:span><text:span text:style-name="T2">(74/136) </text:span> (74) 1· ]ⲟⲧ̣[ <text:line-break/><text:span text:style-name="T1"> </text:span><text:span text:style-name="T2">(74/137) </text:span> ]ⲧ[.]ϩ̣...[ <text:line-break/><text:span text:style-name="T1"> </text:span><text:span text:style-name="T2">(74/138) </text:span> ]ⲓ̅ⲥ̣̅̅[ <text:line-break/><text:span text:style-name="T1"> </text:span><text:span text:style-name="T2">(74/139) </text:span> (74) 2· ]ϩⲛ̣[ <text:line-break/><text:span text:style-name="T1"> </text:span><text:span text:style-name="T2">(74/140) </text:span> ]ⲥⲁ[ <text:line-break/><text:span text:style-name="T1"> </text:span><text:span text:style-name="T2">(74/141) </text:span> ].ⲩⲉ̣.[ <text:line-break/><text:span text:style-name="T1"> </text:span><text:span text:style-name="T2">(74/142) </text:span> (75) 1· ]ⲡ̣ⲟⲩⲛ̣[ <text:line-break/><text:span text:style-name="T1"> </text:span><text:span text:style-name="T2">(74/143) </text:span> ]ⲧ̣̅̅ⲃ̣̅̅ⲁ̅ⲣ̅[̅ⲃ̅ⲏ̅ⲗ̅ⲱ̅ⲛ̅ <text:line-break/><text:span text:style-name="T1"> </text:span><text:span text:style-name="T2">(74/144) </text:span> ]ⲛ̣ϩ̅[ <text:line-break/><text:span text:style-name="T1"> </text:span><text:span text:style-name="T2">(74/145) </text:span> (75) 2· ]ⲟⲟⲩⲧ[ <text:line-break/><text:span text:style-name="T1"> </text:span><text:span text:style-name="T2">(74/146) </text:span> ]ⲟⲛ ϫ̣[ <text:line-break/><text:span text:style-name="T1"> </text:span><text:span text:style-name="T2">(74/147) </text:span> ].ⲛ̅ⲗ̣[ <text:line-break/><text:span text:style-name="T1"> </text:span><text:span text:style-name="T2">(74/148) </text:span> ]ⲣ̅ ϥ[ <text:line-break/><text:span text:style-name="T1"> </text:span><text:span text:style-name="T2">(74/149) </text:span> (82) 1· ]...[ <text:line-break/><text:span text:style-name="T1"> </text:span><text:span text:style-name="T2">(74/150) </text:span> ]..[ <text:line-break/><text:span text:style-name="T1"> </text:span><text:span text:style-name="T2">(74/151) </text:span> (82) 2· ]ⲣⲙ̅ⲣⲁ[ϣ <text:line-break/><text:span text:style-name="T1"> </text:span><text:span text:style-name="T2">(74/152) </text:span> ]ⲩⲛ̅[ <text:line-break/><text:span text:style-name="T1"> </text:span><text:span text:style-name="T2">(74/153) </text:span> (83) 1· ].ⲃ.[ <text:line-break/><text:span text:style-name="T1"> </text:span><text:span text:style-name="T2">(74/154) </text:span> ]ⲛⲧ̅’ .[ <text:line-break/><text:span text:style-name="T1"> </text:span><text:span text:style-name="T2">(74/155) </text:span> (83) 2· ].ⲓ̣ϣ[ <text:line-break/><text:span text:style-name="T1"> </text:span><text:span text:style-name="T2">(74/156) </text:span> ]ⲉⲩ.[ <text:line-break/><text:span text:style-name="T1"> </text:span><text:span text:style-name="T2">(74/157) </text:span> (86) 1· ].[..].[ <text:line-break/><text:span text:style-name="T1"> </text:span><text:span text:style-name="T2">(74/158) </text:span> ].ⲁ̣ⲛ.ϫ[ <text:line-break/><text:span text:style-name="T1"> </text:span><text:span text:style-name="T2">(74/159) </text:span> ]...[ <text:line-break/><text:span text:style-name="T1"> </text:span><text:span text:style-name="T2">(74/160) </text:span> (86) 2· ]..[.].[ <text:line-break/><text:span text:style-name="T1"> </text:span><text:span text:style-name="T2">(74/161) </text:span> ]..[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4:10:46.273573900</meta:creation-date>
    <dc:date>2026-03-24T14:25:45.682102200</dc:date>
    <meta:editing-duration>PT4M41S</meta:editing-duration>
    <meta:editing-cycles>1</meta:editing-cycles>
    <meta:document-statistic meta:table-count="0" meta:image-count="0" meta:object-count="0" meta:page-count="37" meta:paragraph-count="6" meta:word-count="7458" meta:character-count="53050" meta:non-whitespace-character-count="40559"/>
    <meta:generator>LibreOffice/26.2.1.2$Windows_X86_64 LibreOffice_project/620$Build-2</meta:generator>
  </office:meta>
</office:document-meta>
</file>