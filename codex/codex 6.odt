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Antinoou"/>
    </style:style>
    <style:style style:name="P2" style:family="paragraph" style:parent-style-name="Text_20_body">
      <style:text-properties style:font-name="Antinoou"/>
    </style:style>
    <style:style style:name="P3" style:family="paragraph" style:parent-style-name="Standard">
      <style:paragraph-properties fo:break-before="page"/>
      <style:text-properties style:font-name="Antinoou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VI ) The Acts of Peter and the Twelve Apostles</text:p>
      <text:p text:style-name="P2"><text:span text:style-name="T1"> </text:span><text:span text:style-name="T2">(1/1) </text:span> [ 8+- ]ϫⲉ ⲉⲧ̣[ <text:line-break/><text:span text:style-name="T1"> </text:span><text:span text:style-name="T2">(1/2) </text:span> [.....ⲡ]ⲣ̣ⲟⲫⲁⲥ̣[ⲓⲥ <text:line-break/><text:span text:style-name="T1"> </text:span><text:span text:style-name="T2">(1/3) </text:span> [....]ⲥ· ϫⲉ ⲁⲥϣ[ⲱⲡ]ⲉ̣ ⲛ̅[ⲧⲁⲣ] <text:line-break/><text:span text:style-name="T1"> </text:span><text:span text:style-name="T2">(1/4) </text:span> [....]ⲱⲧ’ ⲙ̅ⲙⲟⲛ̣ ⲉ̣ⲃⲟⲗ ⲉ.[ <text:line-break/><text:span text:style-name="T1"> </text:span><text:span text:style-name="T2">(1/5) </text:span> [....]ⲓ̣ⲟⲛ ⲛⲁⲡⲟ̣ⲥⲧⲟⲗⲟ̣ⲥ· ⲁ[ <text:line-break/><text:span text:style-name="T1"> </text:span><text:span text:style-name="T2">(1/6) </text:span> [....].[..]ⲉ ⲁⲛⲣ̅ ϩⲱⲧ’ ⲉⲛ.[.]. ⲛ̅‐ <text:line-break/><text:span text:style-name="T1"> </text:span><text:span text:style-name="T2">(1/7) </text:span> [....] ⲙ̣̅ⲡⲓⲥⲱⲙⲁ· ⲙⲛ̅ ϩⲉⲛⲕ̣ⲉ‐ <text:line-break/><text:span text:style-name="T1"> </text:span><text:span text:style-name="T2">(1/8) </text:span> [ⲕⲟⲟⲩ]ⲉ ⲉⲩⲟ ⲛ̅ⲣⲟⲟⲩϣ ϩⲙ̅ ⲡⲉ̣[ϫ]‐ <text:line-break/><text:span text:style-name="T1"> </text:span><text:span text:style-name="T2">(1/9) </text:span> [ϩⲏⲧ’·] ⲁⲩⲱ ⲛ̅ⲥⲁ ϩⲏⲧⲛ̅ ⲁⲛⲣ̅ ⲟⲩ‐ <text:line-break/><text:span text:style-name="T1"> </text:span><text:span text:style-name="T2">(1/10) </text:span> ϩ̣[ⲏⲧ’] ⲟⲩⲱⲧ’· ⲁⲛϯ ⲙⲉⲧⲉ ⲉϫⲉⲕ <text:line-break/><text:span text:style-name="T1"> </text:span><text:span text:style-name="T2">(1/11) </text:span> ϯⲇⲓⲁⲕⲟⲛⲓⲁ ⲉⲃⲟⲗ ⲉⲧⲁϥⲧⲟϣⲛ̅ <text:line-break/><text:span text:style-name="T1"> </text:span><text:span text:style-name="T2">(1/12) </text:span> ⲉⲣⲟⲥ ⲛ̅ϭⲓ ⲡϫⲟⲉⲓⲥ· ⲁⲩⲱ ⲁⲛϯ <text:line-break/><text:span text:style-name="T1"> </text:span><text:span text:style-name="T2">(1/13) </text:span> ⲛ̅ⲟⲩⲥⲩⲛⲧⲁⲅⲏ ⲛ̅ⲛⲉⲛⲉⲣⲏⲟⲩ <text:line-break/><text:span text:style-name="T1"> </text:span><text:span text:style-name="T2">(1/14) </text:span> ⲁⲛ{ⲉ̅ⲓ} ⲉⲃⲟⲗ ⲉϫⲛ̅ ⲑⲁⲗⲁⲥⲥⲁ· ⲕⲁ‐ <text:line-break/><text:span text:style-name="T1"> </text:span><text:span text:style-name="T2">(1/15) </text:span> ⲧⲁ ⲟⲩⲉⲩⲕⲁⲓⲣⲓⲁ ⲉⲁⲥϣⲱⲡⲉ <text:line-break/><text:span text:style-name="T1"> </text:span><text:span text:style-name="T2">(1/16) </text:span> ⲛⲁⲛ ⲉⲃⲟⲗ {ϩ̅ⲓ}ⲧⲛ̅ ⲡϫⲟⲉⲓⲥ· ⲁⲛϭⲓ‐ <text:line-break/><text:span text:style-name="T1"> </text:span><text:span text:style-name="T2">(1/17) </text:span> ⲛⲉ ⲛ̅ⲟⲩϫⲟⲉⲓ ⲉϥⲙⲟⲛⲉ ⲉⲡⲉⲕⲣⲟ <text:line-break/><text:span text:style-name="T1"> </text:span><text:span text:style-name="T2">(1/18) </text:span> ⲉϥⲥⲟⲃⲧⲉ ⲙ̅ⲙⲟϥ ⲉϭⲱⲟⲩ ⲉⲃⲟⲗ· <text:line-break/><text:span text:style-name="T1"> </text:span><text:span text:style-name="T2">(1/19) </text:span> ⲁⲩⲱ ⲁⲛϣⲁϫⲉ ⲙⲛ̅ ⲛ̅ⲛⲉⲉϥ ⲛ̅ⲧⲉ <text:line-break/><text:span text:style-name="T1"> </text:span><text:span text:style-name="T2">(1/20) </text:span> ⲡϫⲟⲉⲓ ⲉⲧⲣⲉⲛⲁⲗⲉ ⲛⲙ̅ⲙⲁⲩ· ⲛ̅‐ <text:line-break/><text:span text:style-name="T1"> </text:span><text:span text:style-name="T2">(1/21) </text:span> ⲧⲟⲟⲩ ϩⲱⲟⲩ ⲁⲩⲣ̅ ⲟⲩⲛⲟϭ ⲙ̅‐ <text:line-break/><text:span text:style-name="T1"> </text:span><text:span text:style-name="T2">(1/22) </text:span> ⲙⲛ̅ⲧ’ⲙⲁⲉⲓⲣⲱⲙⲉ ⲛⲙ̅ⲙⲁⲛ ⲕⲁ‐ <text:line-break/><text:span text:style-name="T1"> </text:span><text:span text:style-name="T2">(1/23) </text:span> ⲧⲁ ⲛⲉⲧ’ⲧⲏϣ ⲉⲃⲟⲗ {ϩ̅ⲓ}ⲧⲙ̅ ⲡϫⲟⲉⲓⲥ· <text:line-break/><text:span text:style-name="T1"> </text:span><text:span text:style-name="T2">(1/24) </text:span> ⲁⲥϣⲱⲡⲉ ⲇⲉ ⲛ̅ⲧⲁⲣⲛ̅ϭⲱⲟⲩ <text:line-break/><text:span text:style-name="T1"> </text:span><text:span text:style-name="T2">(1/25) </text:span> ⲉⲃⲟⲗ ⲁⲛⲣ̅ ϩⲱⲧ’· ⲁⲛⲣ̅ ⲟⲩϩⲟⲟⲩ <text:line-break/><text:span text:style-name="T1"> </text:span><text:span text:style-name="T2">(1/26) </text:span> ⲙⲛ̅ ⲟⲩⲟⲩϣⲏ· ⲙⲛ̅ⲛ̅ⲥⲁ ⲛⲁⲉⲓ <text:line-break/><text:span text:style-name="T1"> </text:span><text:span text:style-name="T2">(1/27) </text:span> ⲁⲩⲧⲏⲟⲩ ⲛⲓϥⲉ ⲛ̅ⲥⲁ ⲡϫⲟⲉⲓ ⲁϥ‐ <text:line-break/><text:span text:style-name="T1"> </text:span><text:span text:style-name="T2">(1/28) </text:span> ⲃⲉⲕⲛ̅ ⲉϩⲣⲁⲓ̈ ⲉⲩⲕⲟⲩⲉⲓ ⲙ̅ⲡⲟⲗⲓⲥ <text:line-break/><text:span text:style-name="T1"> </text:span><text:span text:style-name="T2">(1/29) </text:span> ⲉⲥϩⲛ̅ ⲧⲙⲏⲧⲉ ⲛ̅ⲑⲁⲗⲁⲥⲥⲁ· ⲁⲛⲟⲕ <text:line-break/><text:span text:style-name="T1"> </text:span><text:span text:style-name="T2">(1/30) </text:span> ⲇⲉ ⲡⲉⲧⲣⲟⲥ ⲁⲉⲓϣⲓⲛⲉ ⲛ̅ⲥⲁ ⲡⲣⲁⲛ <text:line-break/><text:span text:style-name="T1"> </text:span><text:span text:style-name="T2">(1/31) </text:span> ⲛ̅ⲧⲉⲓ̈ⲡⲟⲗⲓⲥ ⲛ̅ⲧⲟⲟⲧⲟⲩ ⲛ̅ϩⲟⲉⲓ‐ <text:line-break/><text:span text:style-name="T1"> </text:span><text:span text:style-name="T2">(1/32) </text:span> ⲛⲉ ⲙ̅ⲡⲙⲁ ⲉⲧⲙ̅ⲙⲁⲩ· ⲉⲩⲁϩⲉ‐ <text:line-break/><text:span text:style-name="T1"> </text:span><text:span text:style-name="T2">(1/33) </text:span> ⲣⲁⲧⲟⲩ {ϩ̅ⲓ} ⲧⲉⲙⲣⲱ· ⲁϥⲟⲩⲱϣⲃ̅ <text:line-break/><text:span text:style-name="T1"> </text:span><text:span text:style-name="T2">(2/2) </text:span> [ⲛ̅ϭⲓ ⲟⲩⲣⲱⲙⲉ ⲛ̅]ϩⲏⲧ[ⲟⲩ ⲉϥϫⲱ ⲙ̅]‐ <text:line-break/><text:span text:style-name="T1"> </text:span><text:span text:style-name="T2">(2/3) </text:span> [ⲙⲟⲥ ϫⲉ ⲡⲣⲁⲛ ⲛ̅]ⲧⲉⲓ̈ⲡ[ⲟⲗⲓⲥ ⲡⲉ ϫⲉ] <text:line-break/><text:span text:style-name="T1"> </text:span><text:span text:style-name="T2">(2/4) </text:span> [ϭⲱⲣϭ̅ ⲉⲧⲉ ⲡ]ⲁ̣[ⲓ̈] ⲡⲉ ⲧⲁϫⲣⲟ̣ [ <text:line-break/><text:span text:style-name="T1"> </text:span><text:span text:style-name="T2">(2/5) </text:span> [..ϩⲩ]ⲡ̣ⲟ[ⲙⲟ]ⲛⲏ̣· ⲁⲩⲱ .[ <text:line-break/><text:span text:style-name="T1"> </text:span><text:span text:style-name="T2">(2/6) </text:span> [ⲛ̅ϭⲓ] ⲡ̣ⲉϩⲏⲅⲉ[ⲙ]ⲱⲛ ⲉⲧⲛ̅ϩ[ⲏⲧⲟⲩ] <text:line-break/><text:span text:style-name="T1"> </text:span><text:span text:style-name="T2">(2/7) </text:span> [ⲉϥϫⲓ] ⲙ̣̅ⲡⲃⲁⲉ ⲙ̅ⲫⲏⲧ’ ⲛ̣̅[ⲧⲉⲙⲣⲱ] <text:line-break/><text:span text:style-name="T1"> </text:span><text:span text:style-name="T2">(2/8) </text:span> ⲁ̣ⲥ̣[ϣ]ⲱⲡⲉ ⲇⲉ ⲛ̅ⲧⲁⲣⲛ̅ⲃⲱ̣[ⲕ ⲙⲛ̅ ⲡⲓ]‐ <text:line-break/><text:span text:style-name="T1"> </text:span><text:span text:style-name="T2">(2/9) </text:span> ⲥⲕ̣ⲉ̣ⲩⲟⲥ ⲉⲡⲓⲕⲣⲟ· ⲁⲉⲓⲃⲱ̣[ⲕ ⲉϩⲟⲩⲛ] <text:line-break/><text:span text:style-name="T1"> </text:span><text:span text:style-name="T2">(2/10) </text:span> ⲉ[ϯ]ⲡⲟⲗⲓⲥ ⲉⲉⲓⲕⲱⲧⲉ ⲁⲡⲓ[ϣⲟϫⲛⲉ] <text:line-break/><text:span text:style-name="T1"> </text:span><text:span text:style-name="T2">(2/11) </text:span> ⲛ̣̅ⲥⲁ ⲟⲩⲙⲁ ⲛ̅ⲥⲑⲟ· ⲁϥ{ⲉ̅ⲓ} ⲉⲃ[ⲟⲗ] <text:line-break/><text:span text:style-name="T1"> </text:span><text:span text:style-name="T2">(2/12) </text:span> ⲛ̣̅ϭⲓ ⲟⲩⲣⲱⲙⲉ ⲉϥⲫⲟⲣⲓ ⲛ̅ⲟⲩⲗ̣[ⲉ]ⲛ̣ⲧ̣[ⲓ]‐ <text:line-break/><text:span text:style-name="T1"> </text:span><text:span text:style-name="T2">(2/13) </text:span> ⲟⲛ ⲉϥⲙⲏⲣ ⲙ̅ⲙⲟϥ ⲉϫⲛ̅ ⲧⲉϥϯⲡⲉ· <text:line-break/><text:span text:style-name="T1"> </text:span><text:span text:style-name="T2">(2/14) </text:span> ⲉⲩⲛ̅ ⲟⲩ̣ⲙⲟϫϩ̅ ⲛ̅ⲛⲟⲩⲃ ⲉϥⲙⲏⲣ ⲙ̅ⲙ[ⲟϥ] <text:line-break/><text:span text:style-name="T1"> </text:span><text:span text:style-name="T2">(2/15) </text:span> ⲉⲟⲩⲛ̅ ⲕⲉⲥⲟⲩⲇⲁⲣⲓⲟⲛ ⲙⲏⲣ ⲉϫⲛ̅ ⲧⲉ̣[ϥ]‐ <text:line-break/><text:soft-page-break/><text:span text:style-name="T1"> </text:span><text:span text:style-name="T2">(2/16) </text:span> ⲙⲉⲥⲧ̅’ⲑⲏⲧ’· ⲉϥⲧⲁⲗⲏⲟⲩⲧ ⲉϫⲛ̅ <text:line-break/><text:span text:style-name="T1"> </text:span><text:span text:style-name="T2">(2/17) </text:span> ⲛⲉϥϣⲱⲡϣ̅ ⲉϥϩⲱⲃⲥ̅ ⲛ̅ⲧⲉϥⲁⲡⲉ <text:line-break/><text:span text:style-name="T1"> </text:span><text:span text:style-name="T2">(2/18) </text:span> ⲙⲛ̅ ⲛⲉϥϭⲓϫ· ⲛⲉⲉⲓⲙⲟⲩϩ ⲡⲉ ⲛ̅ⲥⲁ ⲡⲓ‐ <text:line-break/><text:span text:style-name="T1"> </text:span><text:span text:style-name="T2">(2/19) </text:span> ⲣⲱⲙⲉ ϫⲉ ⲛⲉⲟⲩⲥⲁⲉⲓⲉ ⲡⲉ ϩⲙ̅ ⲡⲉϥ‐ <text:line-break/><text:span text:style-name="T1"> </text:span><text:span text:style-name="T2">(2/20) </text:span> ⲙⲟⲩⲛⲕ̅ ⲙⲛ̅ ⲧⲉϥϭⲓⲛⲁϩⲉⲣⲁⲧϥ̅· ϥⲧⲟ‐ <text:line-break/><text:span text:style-name="T1"> </text:span><text:span text:style-name="T2">(2/21) </text:span> ⲟⲩ ⲙ̅ⲙⲉⲣⲟⲥ ⲉⲧⲁⲉⲓⲛⲁⲩ ⲉⲣⲟⲟⲩ <text:line-break/><text:span text:style-name="T1"> </text:span><text:span text:style-name="T2">(2/22) </text:span> ϩⲙ̅ ⲡⲉϥⲥⲱⲙⲁ· ⲛ̅ϭⲟⲡ ⲛ̅ⲧⲉ ⲛⲉϥ‐ <text:line-break/><text:span text:style-name="T1"> </text:span><text:span text:style-name="T2">(2/23) </text:span> ⲟⲩⲉⲣⲏⲧⲉ ⲙⲛ̅ ⲟⲩⲙⲉⲣⲟⲥ ⲛ̅ⲧⲉϥ‐ <text:line-break/><text:span text:style-name="T1"> </text:span><text:span text:style-name="T2">(2/24) </text:span> ⲙⲉⲥⲧ̅’ϩⲏⲧ’· ⲙⲛ̅ ⲑⲱⲙⲉ ⲛ̅ⲧⲉ ⲛⲉϥ‐ <text:line-break/><text:span text:style-name="T1"> </text:span><text:span text:style-name="T2">(2/25) </text:span> ϭⲓϫ ⲙⲛ̅ ⲧⲉϥ{ϩ̅ⲓ}ⲕⲱⲛ· ⲛⲁⲓ̈ ⲉⲛⲧⲁⲓ̈‐ <text:line-break/><text:span text:style-name="T1"> </text:span><text:span text:style-name="T2">(2/26) </text:span> ϭⲙ̅ϭⲟⲙ ⲉⲛⲁⲩ ⲉⲣⲟⲟⲩ· ⲉⲩⲛ̅ ⲟⲩ‐ <text:line-break/><text:span text:style-name="T1"> </text:span><text:span text:style-name="T2">(2/27) </text:span> ⲕ̣ⲁⲉⲓϩⲉ ⲛ̅ϫⲱⲙⲉ ⲙ̅ⲡⲣⲏⲧⲉ ⲛ̅ⲛⲁ̣‐ <text:line-break/><text:span text:style-name="T1"> </text:span><text:span text:style-name="T2">(2/28) </text:span> ϫⲙ̣ⲉ̣ {ⲛ}ϩⲛ̅ ⲧⲉϥϭⲓϫ ⲛ̅ϩⲃⲟⲩⲣ· ⲉⲩ‐ <text:line-break/><text:span text:style-name="T1"> </text:span><text:span text:style-name="T2">(2/29) </text:span> ⲛ̅ ⲟⲩϣⲃⲱⲧ’ ⲛ̅ϣⲉ ⲛ̅ⲥⲧⲩⲣⲁⲝ ϩⲛ̅ <text:line-break/><text:span text:style-name="T1"> </text:span><text:span text:style-name="T2">(2/30) </text:span> ⲧⲉϥϭⲓϫ ⲛ̅ⲟⲩⲛⲁⲙ· ⲛⲉⲣⲉⲧⲉϥ‐ <text:line-break/><text:span text:style-name="T1"> </text:span><text:span text:style-name="T2">(2/31) </text:span> ⲥⲙⲏ ⲥⲛ̅ⲥⲛ̅ ⲡⲉ ⲉϥϩⲟⲣϣ̅ ⲉϥϣⲁϫⲉ̣ <text:line-break/><text:span text:style-name="T1"> </text:span><text:span text:style-name="T2">(2/32) </text:span> ⲉϥⲱϣ ⲉⲃⲟⲗ ϩⲛ̅ ϯⲡⲟⲗⲓⲥ ϫⲉ ⲙⲁ[ⲣ]‐ <text:line-break/><text:span text:style-name="T1"> </text:span><text:span text:style-name="T2">(2/33) </text:span> ⲅⲁⲣⲓⲧⲏⲥ ⲙⲁⲣⲅⲁⲣⲓⲧⲏⲥ· ⲁⲛⲟⲕ <text:line-break/><text:span text:style-name="T1"> </text:span><text:span text:style-name="T2">(2/34) </text:span> ϩⲱ ⲛⲉⲓ̈ⲙⲉⲉⲩⲉ ⲡⲉ ϫⲉ ⲟⲩⲣⲱ[ⲙⲉ ⲛ̅]‐ <text:line-break/><text:span text:style-name="T1"> </text:span><text:span text:style-name="T2">(2/35) </text:span> ϯⲡⲟⲗⲓⲥ ⲉⲧⲙ̅ⲙⲁⲩ ⲡⲉ· ⲡⲉϫⲁⲓ̣̈ <text:line-break/><text:span text:style-name="T1"> </text:span><text:span text:style-name="T2">(2/36) </text:span> ⲛⲁϥ ϫⲉ ⲡⲁⲥⲟⲛ ⲁⲩⲱ ⲡⲁϣⲃⲏⲣ <text:line-break/><text:span text:style-name="T1"> </text:span><text:span text:style-name="T2">(3/1) </text:span> [ⲁϥⲟⲩⲱϣⲃ̅] ⲛⲁⲓ̈ ϩⲱ̣[ⲱϥ ⲉϥϫⲱ ⲙ̅ⲙⲟⲥ] <text:line-break/><text:span text:style-name="T1"> </text:span><text:span text:style-name="T2">(3/2) </text:span> [ϫⲉ ⲕⲁⲗ]ⲱⲥ ⲁⲕϫ̣ⲟ[ⲟⲥ ϫⲉ ⲡⲁⲥⲟⲛ] <text:line-break/><text:span text:style-name="T1"> </text:span><text:span text:style-name="T2">(3/3) </text:span> [ⲁⲩⲱ ⲡ]ⲁϣⲃⲏⲣ̣ ⲟ̣ⲩ̣ ⲡⲉⲧ̣[ⲕϣⲓⲛⲉ] <text:line-break/><text:span text:style-name="T1"> </text:span><text:span text:style-name="T2">(3/4) </text:span> [ⲉⲣⲟϥ ⲛ̅]ⲧⲟⲟⲧ’· ⲡⲉ[ϫ]ⲁⲓ̈ ⲛⲁϥ ϫⲉ [ϯϣⲓ]‐ <text:line-break/><text:span text:style-name="T1"> </text:span><text:span text:style-name="T2">(3/5) </text:span> [ⲛⲉ ⲛ̅ⲥⲁ ⲟ]ⲩⲙⲁ ⲛ̅ⲥⲑⲟ ⲉⲣⲟⲕ ⲁ̣[ⲛ]ⲟⲕ̣ <text:line-break/><text:span text:style-name="T1"> </text:span><text:span text:style-name="T2">(3/6) </text:span> [ⲙⲛ̅ ⲛ̅]ⲕⲉⲥⲛⲏⲩ ⲉⲃⲟⲗ ϫⲉ ⲁ[ⲛⲟ]ⲛ <text:line-break/><text:span text:style-name="T1"> </text:span><text:span text:style-name="T2">(3/7) </text:span> [ϩⲉⲛϣ]ⲙ̅ⲙⲟ ⲙ̅ⲡⲓⲙⲁ· ⲡⲉϫⲁϥ [ⲛ]ⲁⲓ̈ <text:line-break/><text:span text:style-name="T1"> </text:span><text:span text:style-name="T2">(3/8) </text:span> [ϫⲉ ⲉ]ⲧⲃⲉ ⲡⲁⲓ̈ ⲁⲉⲓⲣ̅ ϣⲟⲣⲡ̅’ ⲛ̅ϫⲟ̣[ⲟ]ⲥ <text:line-break/><text:span text:style-name="T1"> </text:span><text:span text:style-name="T2">(3/9) </text:span> [ⲁⲛⲟ]ⲕ̣ ϩⲱ ϫⲉ ⲡⲁⲥⲟⲛ ⲁⲩⲱ ⲡⲁϣⲃⲏ[ⲣ] <text:line-break/><text:span text:style-name="T1"> </text:span><text:span text:style-name="T2">(3/10) </text:span> ⲉⲃ̣ⲟⲗ ϫⲉ ⲁⲛⲟⲕ ⲟⲩϣⲃⲏⲣ ⲛ̅ϣⲙ̅‐ <text:line-break/><text:span text:style-name="T1"> </text:span><text:span text:style-name="T2">(3/11) </text:span> ⲙⲟ ϩⲱ ⲙ̅ⲡⲉⲕⲣⲏⲧⲉ· ⲛⲁⲓ̈ ⲇⲉ <text:line-break/><text:span text:style-name="T1"> </text:span><text:span text:style-name="T2">(3/12) </text:span> ⲛ̅ⲧⲁϥϫⲟⲟⲩ ⲁϥⲱϣ ⲉⲃⲟⲗ ϫⲉ <text:line-break/><text:span text:style-name="T1"> </text:span><text:span text:style-name="T2">(3/13) </text:span> ⲙⲁⲣⲅⲁⲣⲓⲧⲏⲥ ⲙⲁⲣⲅⲁⲣⲓⲧⲏⲥ· <text:line-break/><text:span text:style-name="T1"> </text:span><text:span text:style-name="T2">(3/14) </text:span> ⲁⲩⲥⲱⲧⲙ̅ ⲉⲧⲉϥⲥⲙⲏ ⲛ̅ϭⲓ ⲛ̅ⲣⲙ̅‐ <text:line-break/><text:span text:style-name="T1"> </text:span><text:span text:style-name="T2">(3/15) </text:span> ⲙⲁⲟ ⲛ̅ϯⲡⲟⲗⲓⲥ ⲉⲧⲙ̅ⲙⲁⲩ· <text:line-break/><text:span text:style-name="T1"> </text:span><text:span text:style-name="T2">(3/16) </text:span> ⲁⲩⲉⲓ ⲉⲃⲟⲗ ϩⲛ̅ ⲛⲉⲩⲧⲁⲙⲓⲟⲛ <text:line-break/><text:span text:style-name="T1"> </text:span><text:span text:style-name="T2">(3/17) </text:span> ⲉⲑⲏⲡ’· ϩⲉⲛⲕⲟⲟⲩⲉ ⲇⲉ ⲛⲉⲩ‐ <text:line-break/><text:span text:style-name="T1"> </text:span><text:span text:style-name="T2">(3/18) </text:span> ϭⲱϣⲧ̅’ ⲉⲃⲟⲗ ϩⲛ̅ ⲛ̅ⲧⲁⲙⲓⲟⲛ ⲛ̅‐ <text:line-break/><text:span text:style-name="T1"> </text:span><text:span text:style-name="T2">(3/19) </text:span> ⲧⲉ ⲡⲟⲩⲏⲉⲓ· ϩⲉⲛⲕⲟⲟⲩⲉ ⲁⲩ‐ <text:line-break/><text:span text:style-name="T1"> </text:span><text:span text:style-name="T2">(3/20) </text:span> ϭⲱϣⲧ̅’ ⲉⲃⲟⲗ ϩⲛ̅ ⲛⲉⲩϣⲟⲩ‐ <text:line-break/><text:span text:style-name="T1"> </text:span><text:span text:style-name="T2">(3/21) </text:span> ϣⲧ̅’ ⲉⲧ’ϫⲟⲥⲉ· ⲁⲩⲱ ⲙ̅ⲡⲟⲩⲛⲁⲩ <text:line-break/><text:span text:style-name="T1"> </text:span><text:span text:style-name="T2">(3/22) </text:span> ⲉⲗⲁⲁⲩ ⲛ̅ⲧⲟⲟⲧϥ̅ ⲉⲃⲟⲗ ϫⲉ ⲙ̅‐ <text:line-break/><text:span text:style-name="T1"> </text:span><text:span text:style-name="T2">(3/23) </text:span> ⲙⲛ̅ ⲡⲏⲣⲁ {ϩ̅ⲓ} ⲧⲉϥⲛⲁϩⲃ̅· ⲟⲩⲇⲉ <text:line-break/><text:span text:style-name="T1"> </text:span><text:span text:style-name="T2">(3/24) </text:span> ⲙⲛ̅ ⲙⲟⲩⲣ ϩⲙ̅ ⲡⲉϥⲗⲉⲛⲧⲓⲟⲛ <text:line-break/><text:span text:style-name="T1"> </text:span><text:span text:style-name="T2">(3/25) </text:span> ⲙⲛ̅ ⲡⲓⲥⲟⲩⲇⲁⲣⲓⲟⲛ· ⲉⲧⲃⲉ ⲧⲟⲩ‐ <text:line-break/><text:span text:style-name="T1"> </text:span><text:span text:style-name="T2">(3/26) </text:span> ⲙⲛ̅ⲧ’ϣⲁⲥⲣⲱⲙⲉ ⲇⲉ ⲙ̅ⲡⲟⲩ‐ <text:line-break/><text:soft-page-break/><text:span text:style-name="T1"> </text:span><text:span text:style-name="T2">(3/27) </text:span> ϣⲛ̅ⲧϥ̅ ⲣⲱ ⲉϩⲣⲁϥ· ⲛ̅ⲧⲟϥ ϩⲱ‐ <text:line-break/><text:span text:style-name="T1"> </text:span><text:span text:style-name="T2">(3/28) </text:span> ⲱϥ ⲙ̅ⲡϥ̅ⲟⲩⲟⲛϩϥ̅ ⲛⲁⲩ ⲉⲃⲟⲗ· <text:line-break/><text:span text:style-name="T1"> </text:span><text:span text:style-name="T2">(3/29) </text:span> ⲁⲩⲕⲟⲧⲟⲩ ⲉϩⲟⲩⲛ ⲉⲛⲉⲩⲧⲁ‐ <text:line-break/><text:span text:style-name="T1"> </text:span><text:span text:style-name="T2">(3/30) </text:span> ⲙⲓⲟⲛ ⲉⲩϫⲱ ⲙ̅ⲙⲟⲥ ϫⲉ ⲉⲣⲉ‐ <text:line-break/><text:span text:style-name="T1"> </text:span><text:span text:style-name="T2">(3/31) </text:span> ⲡ̣ⲉⲓ̈ⲣⲱⲙⲉ ⲥⲱⲃⲉ ⲙ̅ⲙⲟⲛ· <text:line-break/><text:span text:style-name="T1"> </text:span><text:span text:style-name="T2">(3/32) </text:span> ⲁⲩⲱ ⲁⲩⲥⲱⲧⲙ̅ ⲛ̅ϭⲓ ⲛ̅ϩⲏⲕⲉ <text:line-break/><text:span text:style-name="T1"> </text:span><text:span text:style-name="T2">(4/1) </text:span> [ⲛ̅ϯⲡⲟⲗⲓⲥ ⲉⲧ]ⲙ̣̅ⲙⲁⲩ [ⲉⲧⲉϥⲥⲙⲏ·] <text:line-break/><text:span text:style-name="T1"> </text:span><text:span text:style-name="T2">(4/2) </text:span> [ⲁⲩ{ⲉ̅ⲓ} ⲉⲃⲟⲗ ⲉ]ⲡ̣ⲣⲱⲙⲉ̣ ⲡ̣[ⲁⲓ̈ ⲉⲧ’ϯ] ⲙ̣̅‐ <text:line-break/><text:span text:style-name="T1"> </text:span><text:span text:style-name="T2">(4/3) </text:span> [ⲡⲉⲓ̈ⲙⲁ]ⲣ̣ⲅ̣[ⲁⲣⲓⲧ]ⲏⲥ ⲉⲃⲟⲗ· ⲡ̣[ⲉϫⲁⲩ] <text:line-break/><text:span text:style-name="T1"> </text:span><text:span text:style-name="T2">(4/4) </text:span> [ⲛⲁϥ ϫⲉ] ϯ ϩⲟⲉⲓ̣ ⲙ̣̅ⲙⲟⲕ ⲛ̅ⲅ’ⲧ[ⲁⲙⲟⲛ] <text:line-break/><text:span text:style-name="T1"> </text:span><text:span text:style-name="T2">(4/5) </text:span> [ⲉⲡⲓ]ⲙⲁⲣⲅⲁⲣⲓⲧⲏⲥ· ⲕⲁⲛ [ⲛ̅ⲧⲛ̅ⲛⲁⲩ] <text:line-break/><text:span text:style-name="T1"> </text:span><text:span text:style-name="T2">(4/6) </text:span> ⲉ[ⲣ]ⲟ̣ϥ̣ ⲛ̅ⲛⲉⲛⲃⲁⲗ· ϫⲉ ⲁⲛⲟⲛ [ⲛ̅ϩⲏⲕⲉ·] <text:line-break/><text:span text:style-name="T1"> </text:span><text:span text:style-name="T2">(4/7) </text:span> ⲙ[ⲛ̅]ⲧⲁⲛ ⲇⲉ ⲙ̅ⲙⲁⲩ ⲛ̅ⲧⲉⲓ̈[.... ⲛ̅ⲧⲓ]‐ <text:line-break/><text:span text:style-name="T1"> </text:span><text:span text:style-name="T2">(4/8) </text:span> ⲙ̣ⲏ ⲉⲧⲁⲁⲥ ϩⲁⲣⲟϥ· ⲁⲗⲗⲁ ⲙ[ⲁⲧⲁⲙⲟⲛ] <text:line-break/><text:span text:style-name="T1"> </text:span><text:span text:style-name="T2">(4/9) </text:span> ⲛ̣̅ⲧⲛ̅ϫⲟⲟⲥ ⲛ̅ⲛⲉⲛϣⲃⲉⲉⲣ̓ ϫ̣[ⲉ ⲁⲛⲛⲁⲩ] <text:line-break/><text:span text:style-name="T1"> </text:span><text:span text:style-name="T2">(4/10) </text:span> ⲉⲩⲙⲁⲣⲅⲁⲣⲓⲧⲏⲥ ⲛ̅ⲛⲉⲛⲃⲁⲗ· ⲁϥ̣ⲟⲩ‐ <text:line-break/><text:span text:style-name="T1"> </text:span><text:span text:style-name="T2">(4/11) </text:span> ⲱϣⲃ̅ ⲉϥϫⲱ ⲙ̅ⲙⲟⲥ ⲛⲁⲩ ϫⲉ ⲉϣϫⲉ <text:line-break/><text:span text:style-name="T1"> </text:span><text:span text:style-name="T2">(4/12) </text:span> ⲟⲩⲛ̅ ϣϭⲟⲙ̓ ⲁⲙⲏⲉⲓⲧⲛ̅ ⲉⲧⲁⲡⲟⲗⲓⲥ· <text:line-break/><text:span text:style-name="T1"> </text:span><text:span text:style-name="T2">(4/13) </text:span> ⲟⲩ ⲙⲟⲛⲟⲛ ⲛ̅ⲧⲁⲧⲁⲙⲱⲧⲛ̅ ⲉⲣⲟϥ <text:line-break/><text:span text:style-name="T1"> </text:span><text:span text:style-name="T2">(4/14) </text:span> ⲛ̅ⲛⲉⲧⲛ̅ⲃⲁⲗ· ⲁⲗⲗⲁ ⲛ̅ⲧⲁⲧⲁⲁϥ ⲛⲏ‐ <text:line-break/><text:span text:style-name="T1"> </text:span><text:span text:style-name="T2">(4/15) </text:span> ⲧⲛ̅ ⲛ̅ϫⲓⲛϫⲏ· ⲁⲩⲥⲱⲧⲙ̅ ⲇⲉ ϩⲱⲟⲩ <text:line-break/><text:span text:style-name="T1"> </text:span><text:span text:style-name="T2">(4/16) </text:span> ⲛ̅ϭⲓ ⲛ̅ϩⲏⲕⲉ ⲛ̅ϯⲡⲟⲗⲓⲥ ⲉⲧⲙ̅ⲙⲁⲩ <text:line-break/><text:span text:style-name="T1"> </text:span><text:span text:style-name="T2">(4/17) </text:span> ⲉⲩϫⲱ ⲙ̅ⲙⲟⲥ ϫⲉ ⲉⲡⲓⲇⲏ ⲁⲛⲟⲛ <text:line-break/><text:span text:style-name="T1"> </text:span><text:span text:style-name="T2">(4/18) </text:span> ϩⲉⲛϣⲁⲧ’ⲙⲛ̅ⲧⲛⲁⲉ· ⲁⲩⲱ ⲧⲛ̅ⲥⲟ‐ <text:line-break/><text:span text:style-name="T1"> </text:span><text:span text:style-name="T2">(4/19) </text:span> ⲟⲩⲛ ϫⲉ ⲙⲁⲣⲉⲣⲱⲙⲉ ϯ ⲙⲁⲣⲅⲁⲣⲓⲧⲏⲥ <text:line-break/><text:span text:style-name="T1"> </text:span><text:span text:style-name="T2">(4/20) </text:span> ⲛ̅ϣⲁⲧ’ⲙⲛ̅ⲧⲛⲁⲉ· ⲁⲗⲗⲁ ⲟⲩⲟⲉⲓⲕ <text:line-break/><text:span text:style-name="T1"> </text:span><text:span text:style-name="T2">(4/21) </text:span> ⲙⲛ̅ ⲟⲩⲥⲁⲧⲉⲉⲣⲉ ⲉϣⲁⲩϫⲓⲧⲥ̅· ⲧⲉ‐ <text:line-break/><text:span text:style-name="T1"> </text:span><text:span text:style-name="T2">(4/22) </text:span> ⲛⲟⲩ ϭⲉ ⲡⲛⲁⲉ ⲉⲧⲛ̅ⲟⲩⲉϣ ϫⲓⲧϥ̅ <text:line-break/><text:span text:style-name="T1"> </text:span><text:span text:style-name="T2">(4/23) </text:span> ⲛ̅ⲧⲟⲟⲧⲕ̅ ϫⲉⲕⲁⲁⲥ ⲉⲕⲉⲧⲥⲁⲃⲟⲛ <text:line-break/><text:span text:style-name="T1"> </text:span><text:span text:style-name="T2">(4/24) </text:span> ⲉⲡⲓⲙⲁⲣⲅⲁⲣⲓⲧⲏⲥ ⲛ̅ⲛⲉⲛⲃⲁⲗ· <text:line-break/><text:span text:style-name="T1"> </text:span><text:span text:style-name="T2">(4/25) </text:span> ⲁⲩⲱ ⲛ̅ⲧⲛ̅ϫⲟⲟⲥ ⲛ̅ⲛⲉⲛϣⲃⲉⲉⲣ ϩⲛ̅ <text:line-break/><text:span text:style-name="T1"> </text:span><text:span text:style-name="T2">(4/26) </text:span> ⲟⲩϣⲟⲩϣⲟⲩ ϫⲉ ⲁⲛⲛⲁⲩ ⲉⲩⲙⲁⲣ‐ <text:line-break/><text:span text:style-name="T1"> </text:span><text:span text:style-name="T2">(4/27) </text:span> ⲅⲁⲣⲓⲧⲏⲥ ⲛ̅ⲛⲉⲛⲃⲁⲗ· ⲉⲃⲟⲗ ϫⲉ <text:line-break/><text:span text:style-name="T1"> </text:span><text:span text:style-name="T2">(4/28) </text:span> ⲙⲁⲩϩⲉ ⲉⲣⲟϥ ⲛ̅ⲧⲛ̅ ϩⲏⲕⲉ ⲙⲁⲗⲓⲥⲧ[ⲁ] <text:line-break/><text:span text:style-name="T1"> </text:span><text:span text:style-name="T2">(4/29) </text:span> ⲛⲓⲣⲉϥⲧⲱⲃϩ̅ ⲙ̅ⲡⲓⲣⲏⲧⲉ· ⲁϥⲟⲩⲱ‐ <text:line-break/><text:span text:style-name="T1"> </text:span><text:span text:style-name="T2">(4/30) </text:span> ϣⲃ̅ ⲡⲉϫⲁϥ ⲛⲁⲩ ϫⲉ ⲉϣϫⲉ ⲟⲩⲛ̅ <text:line-break/><text:span text:style-name="T1"> </text:span><text:span text:style-name="T2">(4/31) </text:span> ϣϭⲟⲙ· ⲁⲙⲏⲉⲓⲧⲛ̅ ϩⲱⲧ’ ⲧⲏⲩⲧⲛ̅ <text:line-break/><text:span text:style-name="T1"> </text:span><text:span text:style-name="T2">(4/32) </text:span> ⲉⲧⲁⲡⲟⲗⲓⲥ· ⲟⲩ ⲙⲟⲛⲟⲛ ⲛ̅ⲧⲁ‐ <text:line-break/><text:span text:style-name="T1"> </text:span><text:span text:style-name="T2">(4/33) </text:span> ⲧⲥⲁⲃⲱⲧⲛ̅ ⲉⲣⲟϥ· ⲁⲗⲗⲁ ⲛ̅ⲧⲁⲧⲁⲁϥ <text:line-break/><text:span text:style-name="T1"> </text:span><text:span text:style-name="T2">(4/34) </text:span> ⲛⲏⲧⲛ̅ ⲛ̅ϫⲓⲛϫⲏ· ⲁⲩⲣⲁϣⲉ ⲛ̅ϭⲓ <text:line-break/><text:span text:style-name="T1"> </text:span><text:span text:style-name="T2">(4/35) </text:span> ⲛⲓϩⲏⲕⲉ ⲙⲛ̅ ⲛⲓⲣⲉϥⲧⲱⲃϩ̅ ⲉⲧⲃⲉ <text:line-break/><text:span text:style-name="T1"> </text:span><text:span text:style-name="T2">(5/1) </text:span> ⲡⲓⲣ[ⲉϥϯ ⲛ̅ϫ]ⲓⲛϫⲏ· ⲁ̣[ⲩϣⲓⲛⲉ ⲛ̅ϭⲓ ⲛⲓ]‐ <text:line-break/><text:span text:style-name="T1"> </text:span><text:span text:style-name="T2">(5/2) </text:span> ⲣⲱ[ⲙⲉ ⲛ̅ⲥ]ⲁ̣ ⲛⲓ{ϩ̅ⲓ}ⲥ̣ⲉ̣ ⲉ̣[ⲡⲉⲧⲣⲟⲥ·] <text:line-break/><text:span text:style-name="T1"> </text:span><text:span text:style-name="T2">(5/3) </text:span> ⲁ̣[ϥⲟⲩ]ⲱ̣ϣⲃ̅ ⲛ̅ϭ[ⲓ] ⲡ[ⲉⲧ]ⲣ̣ⲟⲥ [ⲁⲩⲱ ⲁϥ]‐ <text:line-break/><text:span text:style-name="T1"> </text:span><text:span text:style-name="T2">(5/4) </text:span> ϫ̣ⲟ̣[ⲟⲩ·] ⲛⲁⲓ̈ ⲉⲧⲁϥⲥⲱⲧⲙ̅ 〈ⲙ̅ⲙⲟⲟⲩ〉 ⲉⲛ̣[ⲓ{ϩ̅ⲓ}ⲥⲉ] <text:line-break/><text:span text:style-name="T1"> </text:span><text:span text:style-name="T2">(5/5) </text:span> ⲛ̅ⲧ̣[ⲉ]{ϩ̅ⲓ}ⲏ· ⲉⲃⲟⲗ ϫⲉ ϩⲉⲛⲣ[ⲉϥⲃ]ⲱ̣ⲗ̣ [ⲛ̅ⲛⲓ]‐ <text:line-break/><text:span text:style-name="T1"> </text:span><text:span text:style-name="T2">(5/6) </text:span> {ϩ̅ⲓ}ⲥ[ⲉ ⲣ]ⲱ̣ ⲛⲉ ϩⲛ̅ ⲧⲉⲩⲇⲓⲁⲕⲟⲛⲓⲁ· <text:line-break/><text:soft-page-break/><text:span text:style-name="T1"> </text:span><text:span text:style-name="T2">(5/7) </text:span> ⲡⲉ[ϫⲁ]ϥ̣ ⲙ̅ⲡⲣⲱⲙⲉ ⲉⲧ’ϯ ⲙ̅ⲡⲉⲉⲓ̣‐ <text:line-break/><text:span text:style-name="T1"> </text:span><text:span text:style-name="T2">(5/8) </text:span> ⲙ[ⲁⲣⲅ]ⲁⲣⲓⲧⲏⲥ· ⲉⲃⲟⲗ ϫⲉ ϯⲟⲩⲱϣ <text:line-break/><text:span text:style-name="T1"> </text:span><text:span text:style-name="T2">(5/9) </text:span> ⲉ[ⲙ̅]ⲙⲉ ⲉⲡⲉⲕⲣⲁⲛ ⲙⲛ̅ ⲛ̅{ϩ̅ⲓ}ⲥⲉ ⲛ̅‐ <text:line-break/><text:span text:style-name="T1"> </text:span><text:span text:style-name="T2">(5/10) </text:span> ⲧ̣ⲉ̣{ϩ̅ⲓ}ⲏ ⲉⲧⲉⲕⲡⲟⲗⲓⲥ· ϫⲉ ⲁⲛⲟⲛ <text:line-break/><text:span text:style-name="T1"> </text:span><text:span text:style-name="T2">(5/11) </text:span> ϩⲉⲛϣⲙ̅ⲙⲟ ⲙⲛ̅ ϩⲉⲛⲃⲁⲓ̈ⲁⲓⲕ ⲛ̅ⲧⲉ <text:line-break/><text:span text:style-name="T1"> </text:span><text:span text:style-name="T2">(5/12) </text:span> ⲡⲛⲟⲩⲧⲉ· ⲁⲛⲁⲅ’ⲕⲏ ⲉⲣⲟⲛ ⲉⲥⲣ̅ ⲡⲓ‐ <text:line-break/><text:span text:style-name="T1"> </text:span><text:span text:style-name="T2">(5/13) </text:span> ϣⲁϫⲉ ⲛ̅ⲧⲉ ⲡⲛⲟⲩⲧⲉ ⲉⲃⲟⲗ ϩⲙ̅ <text:line-break/><text:span text:style-name="T1"> </text:span><text:span text:style-name="T2">(5/14) </text:span> ⲡⲟⲗⲓⲥ ⲛⲓⲙ ϩⲛ̅ ⲟⲩϯ ⲙⲉⲧⲉ· ⲁϥ‐ <text:line-break/><text:span text:style-name="T1"> </text:span><text:span text:style-name="T2">(5/15) </text:span> ⲟⲩⲱϣⲃ̅ ⲡⲉϫⲁϥ ϫⲉ ⲉϣϫⲉ ⲕϣⲓ‐ <text:line-break/><text:span text:style-name="T1"> </text:span><text:span text:style-name="T2">(5/16) </text:span> ⲛⲉ ⲛ̅ⲥⲁ ⲡⲁⲣⲁⲛ ⲗ̅ⲓ̅ⲑ̅ⲁ̅ⲣ̅ⲅ̅ⲟ̅ⲏ̅ⲗ̅ <text:line-break/><text:span text:style-name="T1"> </text:span><text:span text:style-name="T2">(5/17) </text:span> ⲡⲉ ⲡⲁⲣⲁⲛ ⲉⲧⲉ ⲡⲉϥⲟⲩⲱϩⲙ̅ ⲡⲉ‐ <text:line-break/><text:span text:style-name="T1"> </text:span><text:span text:style-name="T2">(5/18) </text:span> ϫⲉ ⲡⲱⲛⲉ ⲛ̅ϭⲁϩⲥⲉ ⲉⲧⲁⲥⲓⲱⲟⲩ <text:line-break/><text:span text:style-name="T1"> </text:span><text:span text:style-name="T2">(5/19) </text:span> ⲁⲩⲱ ⲡⲕⲉⲙⲟⲉⲓⲧ’ ⲉⲧⲁⲕϣⲛ̅ⲧ’ <text:line-break/><text:span text:style-name="T1"> </text:span><text:span text:style-name="T2">(5/20) </text:span> ⲉⲣⲟϥ ⲛ̅ⲧⲉ ϯⲡⲟⲗⲓⲥ ⲉⲉⲓⲉⲧⲁⲙⲟⲕ <text:line-break/><text:span text:style-name="T1"> </text:span><text:span text:style-name="T2">(5/21) </text:span> ⲉⲣⲟϥ· ⲙⲁⲣⲉⲣⲱⲙⲉ ⲛⲓⲙ ⲉϣ {ⲉ̅ⲓ} <text:line-break/><text:span text:style-name="T1"> </text:span><text:span text:style-name="T2">(5/22) </text:span> {ϩ̅ⲓ} ⲑⲓⲏ ⲉⲧⲙ̅ⲙⲁⲩ· ⲉⲃⲟⲗ ⲉⲟⲩⲁ <text:line-break/><text:span text:style-name="T1"> </text:span><text:span text:style-name="T2">(5/23) </text:span> ⲛ̅ϥⲣ̅ⲁⲡⲟⲧⲁⲥⲥⲉ ⲛ̅ⲛ̅ⲕⲁ ⲛⲓⲙ ⲉ‐ <text:line-break/><text:span text:style-name="T1"> </text:span><text:span text:style-name="T2">(5/24) </text:span> ⲧⲛ̅ⲧⲁϥ· ⲁⲩⲱ ⲛ̅ϥⲣ̅ⲛⲏⲥⲧⲉⲩⲉ <text:line-break/><text:span text:style-name="T1"> </text:span><text:span text:style-name="T2">(5/25) </text:span> ⲙ̅ⲙⲏⲛⲉ ϫⲓⲛ ⲙⲟⲛⲏ ϣⲁ ⲙⲟⲛⲏ· <text:line-break/><text:span text:style-name="T1"> </text:span><text:span text:style-name="T2">(5/26) </text:span> ⲉⲃⲟⲗ ϫⲉ ⲛⲁϣⲉ ⲛ̅ⲗⲏⲥⲧⲏⲥ ⲙⲛ̅ <text:line-break/><text:span text:style-name="T1"> </text:span><text:span text:style-name="T2">(5/27) </text:span> ⲛ̅ⲑⲏⲣⲓⲟⲛ ⲉⲧ’{ϩ̅ⲓ} ⲧⲉ{ϩⲓ}ⲏ ⲉⲧⲙ̅‐ <text:line-break/><text:span text:style-name="T1"> </text:span><text:span text:style-name="T2">(5/28) </text:span> ⲙⲁⲩ· ⲡⲉⲧⲛⲁϥⲓ ⲟⲉⲓⲕ ⲛⲙ̅ⲙⲁϥ <text:line-break/><text:span text:style-name="T1"> </text:span><text:span text:style-name="T2">(5/29) </text:span> ⲉⲡⲓⲙⲟⲉⲓⲧ’ ϣⲁⲣⲉⲛⲓⲟⲩϩⲟⲟⲣ ⲛ̅‐ <text:line-break/><text:span text:style-name="T1"> </text:span><text:span text:style-name="T2">(5/30) </text:span> ⲕⲁⲙⲉ ϩⲟⲧⲃⲉϥ ⲛ̅ⲧⲗⲟⲉⲓϭⲉ ⲛ̅‐ <text:line-break/><text:span text:style-name="T1"> </text:span><text:span text:style-name="T2">(5/31) </text:span> ⲛⲓⲟⲉⲓⲕ· ⲡⲉⲧⲛⲁϥⲓ ⲛ̅ⲟⲩϩⲃ̅ⲥⲱ <text:line-break/><text:span text:style-name="T1"> </text:span><text:span text:style-name="T2">(5/32) </text:span> ⲛⲁϥ ⲉⲥⲧⲁⲉⲓⲏⲟⲩ ⲛ̅ⲧⲉ ⲡⲓⲕⲟ‐ <text:line-break/><text:span text:style-name="T1"> </text:span><text:span text:style-name="T2">(5/33) </text:span> ⲥⲙⲟⲥ ϣⲁⲣⲉⲛ̅ⲗⲏⲥⲧⲏⲥ ϩⲟⲧⲃⲉϥ <text:line-break/><text:span text:style-name="T1"> </text:span><text:span text:style-name="T2">(6/1) </text:span> [ⲛ̅ⲧⲗⲟⲉⲓϭⲉ ⲛ̅ϯϩ]ⲃ̣̅ⲥⲱ· ⲡ̣[ⲉⲧⲛⲁϥⲓ] ⲙⲟ̣[ⲟ]ⲩ <text:line-break/><text:span text:style-name="T1"> </text:span><text:span text:style-name="T2">(6/2) </text:span> [ⲛⲁϥ ϣⲁⲣⲉⲛ̅ⲟⲩ]ⲱⲛϣ̅ [ϩⲟⲧⲃⲉϥ ⲛ̅]ⲧⲗⲟ‐ <text:line-break/><text:span text:style-name="T1"> </text:span><text:span text:style-name="T2">(6/3) </text:span> [ⲉⲓϭⲉ ⲙ̅ⲡⲙⲟⲟ]ⲩ [ⲉ]ⲛⲉⲩⲟⲃⲉ [ⲙ̅ⲙⲟ]ϥ̣· <text:line-break/><text:span text:style-name="T1"> </text:span><text:span text:style-name="T2">(6/4) </text:span> [ⲡⲉⲧⲛ]ⲁϥⲓ [ⲡ]ⲣ̣ⲟⲟⲩϣ ⲛ̅ϩⲉⲛ[ⲁϥ] ⲙ̣ⲛ̣̅ <text:line-break/><text:span text:style-name="T1"> </text:span><text:span text:style-name="T2">(6/5) </text:span> [ϩⲉⲛⲟⲩ]ⲟⲟⲧⲉ· ϣⲁⲣⲉⲛⲓⲙⲟ̣[ⲩⲉⲓ ⲟ]ⲩⲟ‐ <text:line-break/><text:span text:style-name="T1"> </text:span><text:span text:style-name="T2">(6/6) </text:span> [ⲙ]ϥ̣̅ [ⲛ̅ⲧ]ⲗⲟⲉⲓϭⲉ ⲛ̅ⲛⲓⲁϥ· ⲉϥ̣ϣ̣[ⲁⲛ]ⲣ̅ ⲃⲟⲗ <text:line-break/><text:span text:style-name="T1"> </text:span><text:span text:style-name="T2">(6/7) </text:span> ⲛ̣̅ⲧ̣ⲟ̣ⲟⲧ〈ⲟⲩ〉 ⲛ̅ⲛⲓⲙⲟⲩⲉⲓ· ϣⲁⲣⲉ̣[ⲛⲓ]ⲙⲁⲥⲉ <text:line-break/><text:span text:style-name="T1"> </text:span><text:span text:style-name="T2">(6/8) </text:span> ⲟⲙⲕϥ̅ ⲛ̅ⲧⲗⲟⲉⲓϭⲉ ⲛ̅ⲛⲓⲟⲩⲟⲧⲉ[· ⲛ]ⲁ̣ⲓ̈ ⲛ̅‐ <text:line-break/><text:span text:style-name="T1"> </text:span><text:span text:style-name="T2">(6/9) </text:span> ⲧⲁⲣⲉϥϫⲟⲟⲩ ⲛⲁⲓ̈ ⲁⲉⲓϥⲓ ⲁϩⲟⲙ [ⲛ̅ϩ]ⲏⲧ’ <text:line-break/><text:span text:style-name="T1"> </text:span><text:span text:style-name="T2">(6/10) </text:span> ⲙⲁⲩⲁⲁⲧ’ ⲉⲉⲓϫⲱ ⲙ̅ⲙⲟⲥ ϫⲉ ⲛ̣̅ⲛ̣ⲟ̣ϭ <text:line-break/><text:span text:style-name="T1"> </text:span><text:span text:style-name="T2">(6/11) </text:span> ⲛ̅{ϩ̅ⲓ}ⲥⲉ {ϩⲓ} ⲡⲙⲟⲉⲓⲧ’· ϩⲁⲙⲁⲉⲓ ⲣⲱ ⲛ̅‐ <text:line-break/><text:span text:style-name="T1"> </text:span><text:span text:style-name="T2">(6/12) </text:span> ⲧⲉⲓ̅ⲥ̅ ϯ ϭⲟⲙ ⲛⲁⲛ ⲛ̅ⲧⲛ̅ⲃⲱⲕ {ϩⲓ}ⲱⲱⲥ· <text:line-break/><text:span text:style-name="T1"> </text:span><text:span text:style-name="T2">(6/13) </text:span> ⲁϥⲛⲁⲩ ⲉⲣⲟⲓ̈ ⲉⲣⲉⲡⲁϩⲟ ⲟⲕⲙ̅ ⲉⲉⲓ‐ <text:line-break/><text:span text:style-name="T1"> </text:span><text:span text:style-name="T2">(6/14) </text:span> ϥⲓ ⲁϩⲟⲙ· ⲡⲉϫⲁϥ ⲛⲁⲓ̈ ϫⲉ ⲉⲧⲃⲉ ⲟⲩ <text:line-break/><text:span text:style-name="T1"> </text:span><text:span text:style-name="T2">(6/15) </text:span> ⲕϥⲓ ⲁϩⲟⲙ· ⲉϣϫⲉ ⲕⲥⲟⲟⲩⲛ ⲣⲱ ⲙ̅‐ <text:line-break/><text:span text:style-name="T1"> </text:span><text:span text:style-name="T2">(6/16) </text:span> ⲡⲉⲓ̈ⲣⲁⲛ ϫⲉ ⲓ̅ⲥ̅ ⲁⲩⲱ ⲕⲛⲁϩⲧⲉ ⲉⲣⲟϥ· <text:line-break/><text:span text:style-name="T1"> </text:span><text:span text:style-name="T2">(6/17) </text:span> ⲟⲩⲛⲟϭ ⲛ̅ϭⲟⲙ ⲡⲉ ⲉϯ ϭⲟⲙ· ⲉⲃⲟⲗ <text:line-break/><text:span text:style-name="T1"> </text:span><text:span text:style-name="T2">(6/18) </text:span> ϫⲉ ⲁⲛⲟⲕ ϩⲱ ϯⲛⲁϩⲧⲉ ⲉⲡⲓⲱⲧ’ <text:line-break/><text:span text:style-name="T1"> </text:span><text:span text:style-name="T2">(6/19) </text:span> ⲡⲏ ⲉⲧⲁϥⲧⲁⲟⲩⲟϥ̣· ⲁⲉⲓⲟⲩⲁϩⲙⲉⲧ’ <text:line-break/><text:span text:style-name="T1"> </text:span><text:span text:style-name="T2">(6/20) </text:span> ⲉⲣⲟϥ ⲉⲓ̈ϣⲓⲛⲉ ⲙ̅ⲙⲟϥ ϫⲉ ⲛⲓⲙ ⲉⲣⲛ̅ <text:line-break/><text:soft-page-break/><text:span text:style-name="T1"> </text:span><text:span text:style-name="T2">(6/21) </text:span> {ⲡⲣⲁⲛ ⲛ̅}ⲡⲙⲁ ⲉⲧⲕ̅ⲛⲁ ⲉⲣⲟϥ <text:line-break/><text:span text:style-name="T1"> </text:span><text:span text:style-name="T2">(6/22) </text:span> ⲉⲧⲉⲕⲡⲟⲗⲓⲥ· ⲡⲉϫⲁϥ ⲛⲁⲓ̈ ϫⲉ <text:line-break/><text:span text:style-name="T1"> </text:span><text:span text:style-name="T2">(6/23) </text:span> ⲡⲁⲓ̈ ⲡⲉ ⲡⲣⲁⲛ ⲛ̅ⲧⲁⲡⲟⲗⲓⲥ ϫⲉ ϩⲉⲛ‐ <text:line-break/><text:span text:style-name="T1"> </text:span><text:span text:style-name="T2">(6/24) </text:span> ⲑ̅ ⲛ̅ⲣⲟ ⲙⲁⲣⲛ̅ϯ ⲉⲟⲟⲩ ⲙ̅ⲡⲛⲟⲩ‐ <text:line-break/><text:span text:style-name="T1"> </text:span><text:span text:style-name="T2">(6/25) </text:span> ⲧⲉ· ⲉⲛⲣ̅ⲙⲉⲗⲉⲧⲁ ϫⲉ ⲡⲓⲙⲁϩⲙⲏⲧ’ <text:line-break/><text:span text:style-name="T1"> </text:span><text:span text:style-name="T2">(6/26) </text:span> ⲡⲉ ϯⲁⲡⲉ· ⲙⲛ̅ⲛ̅ⲥⲁ ⲛⲁⲓ̈ ⲁⲓ̈{ⲉ̅ⲓ} ⲉⲃⲟⲗ <text:line-break/><text:span text:style-name="T1"> </text:span><text:span text:style-name="T2">(6/27) </text:span> {ϩ̅ⲓ}ⲧⲟⲟⲧϥ̅ ϩⲛ̅ ⲟⲩⲉⲓⲣⲏⲛⲏ· ⲉⲓ̈ⲛ̅ⲛⲏ‐ <text:line-break/><text:span text:style-name="T1"> </text:span><text:span text:style-name="T2">(6/28) </text:span> ⲟⲩ ⲉⲙⲟⲩⲧⲉ ⲉⲛⲁϣⲃⲉⲉⲣ· ⲁⲉⲓ‐ <text:line-break/><text:span text:style-name="T1"> </text:span><text:span text:style-name="T2">(6/29) </text:span> ⲛⲁⲩ ⲉϩⲉⲛϩⲟⲉⲓⲙ ⲙⲛ̅ ϩⲉⲛⲛⲟϭ <text:line-break/><text:span text:style-name="T1"> </text:span><text:span text:style-name="T2">(6/30) </text:span> ⲛ̅ϫⲟⲗϫⲗ̅ ⲉⲩϫⲟⲥⲉ ⲉⲩⲕⲱⲧⲉ <text:line-break/><text:span text:style-name="T1"> </text:span><text:span text:style-name="T2">(6/31) </text:span> ⲉⲛⲓⲕⲣⲟ ⲛ̅ⲧⲉ ϯⲡⲟⲗⲓⲥ· ⲁⲉⲓⲣ̅ <text:line-break/><text:span text:style-name="T1"> </text:span><text:span text:style-name="T2">(6/32) </text:span> ϣⲡⲏⲣⲉ ⲛ̅ⲛⲓϭⲟⲙ ⲉϯⲛⲁⲩ ⲉⲣⲟⲟⲩ <text:line-break/><text:span text:style-name="T1"> </text:span><text:span text:style-name="T2">(6/33) </text:span> ⲁⲉⲓⲛⲁⲩ ⲉⲩϩⲗ̅ⲗⲟ ⲛ̅ⲣⲱⲙⲉ ⲉϥ‐ <text:line-break/><text:span text:style-name="T1"> </text:span><text:span text:style-name="T2">(6/34) </text:span> ϩⲙⲟⲟⲥ ⲁⲉⲓϣⲛ̅ⲧϥ̅ ⲉⲡⲣⲁⲛ ⲛ̅ϯⲡⲟ̣‐ <text:line-break/><text:span text:style-name="T1"> </text:span><text:span text:style-name="T2">(6/35) </text:span> ⲗⲓⲥ ϫⲉ ⲛⲉ ⲟⲛⲧⲱⲥ ⲡⲉⲥⲣⲁⲛ <text:line-break/><text:span text:style-name="T1"> </text:span><text:span text:style-name="T2">(7/1) </text:span> [ϭⲱⲣϭ̅ ⲡⲉ·] ⲁ̣ϥⲧ[ <text:line-break/><text:span text:style-name="T1"> </text:span><text:span text:style-name="T2">(7/2) </text:span> [....].[.]ϫⲉ ϭⲱ̣[ⲣϭ̅ <text:line-break/><text:span text:style-name="T1"> </text:span><text:span text:style-name="T2">(7/3) </text:span> [...]ⲛ.· ⲡⲉ̣ϫ[ⲁϥ̣ ⲛⲁⲓ̈ ϫ̣ⲉ ⲕϣⲁ]‐ <text:line-break/><text:span text:style-name="T1"> </text:span><text:span text:style-name="T2">(7/4) </text:span> [ϫⲉ ϩ]ⲛ̣̅ ⲟⲩⲙⲛ̅ⲧⲙⲉ· ⲉⲛϭ[ⲱⲣϭ̅ ⲉⲃⲟⲗ] <text:line-break/><text:span text:style-name="T1"> </text:span><text:span text:style-name="T2">(7/5) </text:span> ϫⲉ̣ [ⲉⲛ]ⲣ̣̅ϩⲩⲡⲟⲙⲓⲛⲉ ⲛ̅ⲛⲓⲙⲁ̣ ⲁ̣ⲉ̣[ⲓ]‐ <text:line-break/><text:span text:style-name="T1"> </text:span><text:span text:style-name="T2">(7/6) </text:span> ⲟ̣[ⲩⲱ]ϣⲃ̅ ⲡⲉϫⲁⲓ̈ ϩⲱ ϫⲉ ⲇⲓⲕⲁⲓⲱ̣[ⲥ] <text:line-break/><text:span text:style-name="T1"> </text:span><text:span text:style-name="T2">(7/7) </text:span> [...]ⲛ̣ ⲛ̅ⲣⲱⲙⲉ ⲁⲩϯ ⲣⲛ̅ⲧⲥ̅ ϫⲉ̣ <text:line-break/><text:span text:style-name="T1"> </text:span><text:span text:style-name="T2">(7/8) </text:span> [...]ⲣⲡ̅’· ⲉⲃⲟⲗ ϫⲉ ⲟⲩⲟⲛ ⲛⲓⲙ <text:line-break/><text:span text:style-name="T1"> </text:span><text:span text:style-name="T2">(7/9) </text:span> [ⲉⲧ]ⲁⲣ̅ϩⲩⲡⲟⲙⲓⲛⲉ ϩⲁ ⲛⲉϥⲡⲓⲣⲁ‐ <text:line-break/><text:span text:style-name="T1"> </text:span><text:span text:style-name="T2">(7/10) </text:span> ⲥ[ⲙ]ⲟ̣ⲥ ϣⲁⲩϭⲱⲣϭ̅ ⲛ̅ϭⲓ ϩⲉⲛⲡⲟⲗⲓⲥ <text:line-break/><text:span text:style-name="T1"> </text:span><text:span text:style-name="T2">(7/11) </text:span> ⲁⲩⲱ ϣⲁⲣⲉⲟⲩⲙⲛ̅ⲧⲣ̅ⲣⲟ ⲉⲥⲧⲁ‐ <text:line-break/><text:span text:style-name="T1"> </text:span><text:span text:style-name="T2">(7/12) </text:span> ⲉⲓⲏⲟⲩⲧ’ {ⲉ̅ⲓ} ⲉⲃⲟⲗ ⲛ̅ϩⲏⲧⲟⲩ· ϫⲉ <text:line-break/><text:span text:style-name="T1"> </text:span><text:span text:style-name="T2">(7/13) </text:span> ⲥⲉⲣϩⲩⲡⲟⲙⲓⲛⲉ ⲛ̅ⲧⲙⲏⲧⲉ ⲛ̅ⲛⲓ‐ <text:line-break/><text:span text:style-name="T1"> </text:span><text:span text:style-name="T2">(7/14) </text:span> ϭⲟⲗ ⲙⲛ̅ ⲛⲉⲙⲕⲁϩ ⲛ̅ⲛ̅ⲧⲏⲟⲩ <text:line-break/><text:span text:style-name="T1"> </text:span><text:span text:style-name="T2">(7/15) </text:span> ϫⲉⲕⲁⲁⲥ ⲛ̅ⲧⲉⲓ̈ϩⲉ ⲟⲩⲟⲛ ⲛⲓⲙ <text:line-break/><text:span text:style-name="T1"> </text:span><text:span text:style-name="T2">(7/16) </text:span> ⲉⲧϥⲓ ϩⲁ ⲡ{ϩ̅ⲓ}ⲥⲉ ⲛ̅ⲧⲉ ⲡⲉϥⲛⲁϩⲃ̅ <text:line-break/><text:span text:style-name="T1"> </text:span><text:span text:style-name="T2">(7/17) </text:span> ⲛ̅ⲧⲉ ⲡⲓⲛⲁϩⲧⲉ ⲥⲛⲁϭⲱⲣϭ̅ ⲛ̅ϭⲓ <text:line-break/><text:span text:style-name="T1"> </text:span><text:span text:style-name="T2">(7/18) </text:span> ⲧⲉϥⲡⲟⲗⲓⲥ· ⲁⲩⲱ ϥⲛⲁⲱⲡ’ ⲁ‐ <text:line-break/><text:span text:style-name="T1"> </text:span><text:span text:style-name="T2">(7/19) </text:span> ⲧⲙⲛ̅ⲧⲣ̅ⲣⲟ ⲛ̅ⲛ̅ⲡⲏⲩⲉ· ⲁⲉⲓϭⲉⲡⲏ <text:line-break/><text:span text:style-name="T1"> </text:span><text:span text:style-name="T2">(7/20) </text:span> ⲁⲉⲓⲃⲱⲕ ⲁⲉⲓⲙⲟⲩⲧⲉ ⲉⲛⲁϣⲃⲉ‐ <text:line-break/><text:span text:style-name="T1"> </text:span><text:span text:style-name="T2">(7/21) </text:span> ⲉⲣ ϫⲉⲕⲁⲁⲥ ⲉⲛⲁⲃⲱⲕ ⲉⲧⲡⲟ‐ <text:line-break/><text:span text:style-name="T1"> </text:span><text:span text:style-name="T2">(7/22) </text:span> ⲗⲓⲥ ⲉⲧⲁϥϯ ⲛⲏⲉⲓⲉ ⲛⲁⲛ ⲉⲣⲟⲥ <text:line-break/><text:span text:style-name="T1"> </text:span><text:span text:style-name="T2">(7/23) </text:span> ϫⲉ ⲗⲓⲑⲁⲣⲅⲟⲏⲗ· ϩⲛ̅ ⲟⲩⲙⲟⲩⲣ <text:line-break/><text:span text:style-name="T1"> </text:span><text:span text:style-name="T2">(7/24) </text:span> ⲛ̅ⲧⲉ ⲡⲛⲁϩⲧⲉ ⲁⲛⲣ̅ⲁⲡⲟⲧⲁⲥ‐ <text:line-break/><text:span text:style-name="T1"> </text:span><text:span text:style-name="T2">(7/25) </text:span> ⲥⲉ ⲛ̅ⲛ̅ⲕⲁ ⲛⲓⲙ ⲕⲁⲧⲁ ⲡⲣⲏⲧⲉ <text:line-break/><text:span text:style-name="T1"> </text:span><text:span text:style-name="T2">(7/26) </text:span> ⲉⲧⲁϥϫⲟⲟⲥ ⲁⲛⲣ̅ ⲃⲟⲗ ⲉⲧⲟⲟ‐ <text:line-break/><text:span text:style-name="T1"> </text:span><text:span text:style-name="T2">(7/27) </text:span> ⲧⲟⲩ ⲛ̅ⲛⲓⲗⲏⲥⲧⲏⲥ ϫⲉ ⲙ̅ⲡⲟⲩ‐ <text:line-break/><text:span text:style-name="T1"> </text:span><text:span text:style-name="T2">(7/28) </text:span> ϭⲓⲛⲉ ⲛ̅ⲧⲉⲩϩⲃ̅ⲥⲱ ⲛ̅ⲧⲟⲟⲧⲛ̅· <text:line-break/><text:span text:style-name="T1"> </text:span><text:span text:style-name="T2">(7/29) </text:span> ⲁⲛⲣ̅ ⲃⲟⲗ ⲛ̅ⲧⲟⲟⲧⲟⲩ ⲛ̅ⲛⲓⲟⲩ‐ <text:line-break/><text:span text:style-name="T1"> </text:span><text:span text:style-name="T2">(7/30) </text:span> ⲱⲛϣ̅ ϫⲉ ⲙ̅ⲡⲟⲩϭⲙ̅ ⲡⲙⲟⲟⲩ <text:line-break/><text:span text:style-name="T1"> </text:span><text:span text:style-name="T2">(7/31) </text:span> ⲛ̅ⲧⲟⲟⲧⲛ̅ ⲉⲧⲟⲩⲟⲃⲉ ⲙ̅ⲙⲟϥ· <text:line-break/><text:span text:style-name="T1"> </text:span><text:span text:style-name="T2">(7/32) </text:span> ⲁⲛⲣ̅ ⲃⲟⲗ ⲛ̅ⲧⲟⲟⲧⲟⲩ ⲛ̅ⲛⲓⲙⲟⲩ‐ <text:line-break/><text:soft-page-break/><text:span text:style-name="T1"> </text:span><text:span text:style-name="T2">(7/33) </text:span> ⲉⲓ ϫⲉ ⲙ̅ⲡⲟⲩϭⲓⲛⲉ ⲛ̅ⲧⲉⲡⲓⲑⲩ‐ <text:line-break/><text:span text:style-name="T1"> </text:span><text:span text:style-name="T2">(7/34) </text:span> ⲙⲓⲁ ⲛ̅ⲧⲉ ⲛⲓⲁϥ ⲛ̅ⲧⲟⲟⲧⲛ̅· <text:line-break/><text:span text:style-name="T1"> </text:span><text:span text:style-name="T2">(8/1) </text:span> [ⲁⲛⲣ̅ ⲃⲟⲗ ⲛ̅ⲧⲟⲟⲧⲟ]ⲩ ⲛ̅[ⲛⲓⲙⲁⲥⲉ <text:line-break/><text:span text:style-name="T1"> </text:span><text:span text:style-name="T2">(8/2) </text:span> [ 10+- ]ⲁⲛⲕ[ <text:line-break/><text:span text:style-name="T1"> </text:span><text:span text:style-name="T2">(8/3) </text:span> [..ⲙ̅ⲡⲟⲩϭⲓⲛⲉ ⲛ̅]ⲛ̅ⲟⲩⲟ̣ⲧⲉ[· ⲁϥϣⲱ]‐ <text:line-break/><text:span text:style-name="T1"> </text:span><text:span text:style-name="T2">(8/4) </text:span> [ⲡⲉ ⲛⲁ]ⲛ̣ ⲛ̅ϭⲓ̣ ⲟ̣ⲩⲛⲟϭ ⲛ̅ⲣⲁϣ[ⲉ ⲙⲛ̅ ⲟⲩ]‐ <text:line-break/><text:span text:style-name="T1"> </text:span><text:span text:style-name="T2">(8/5) </text:span> [ⲙⲛ̅ⲧ’]ⲁ̣ⲧⲣⲟⲟⲩϣ ϩⲛ̅ ⲟⲩⲉⲓⲣ̣[ⲏⲛⲏ ⲛ̅ⲑⲉ ⲙ̅]‐ <text:line-break/><text:span text:style-name="T1"> </text:span><text:span text:style-name="T2">(8/6) </text:span> [ⲡ]ⲉ[ⲧ]ⲛ̣̅ⲡⲉⲛϫⲟⲉⲓⲥ· ⲁⲛ[ⲙ̅ⲧⲟⲛ ⲙ̅]‐ <text:line-break/><text:span text:style-name="T1"> </text:span><text:span text:style-name="T2">(8/7) </text:span> ⲙ̣ⲟⲛ {ϩ̅ⲓ}ⲣⲱⲥ ⲛ̅ϯⲡⲩⲗⲏ· ⲁ[ⲩⲱ] <text:line-break/><text:span text:style-name="T1"> </text:span><text:span text:style-name="T2">(8/8) </text:span> [ⲁ]ⲛϫⲓ ⲛ̅ϩⲣⲁⲛ ⲙⲛ̅ ⲛⲉⲛⲉⲣⲏⲟⲩ [ⲉⲡⲉ]‐ <text:line-break/><text:span text:style-name="T1"> </text:span><text:span text:style-name="T2">(8/9) </text:span> ⲧⲉ ⲛ̅ⲟⲩϫⲓ ϩⲣⲁϥ ⲁⲛ ⲛ̅ⲧⲉ ⲡⲓⲕⲟ̣[ⲥⲙⲟⲥ] <text:line-break/><text:span text:style-name="T1"> </text:span><text:span text:style-name="T2">(8/10) </text:span> ⲡⲁⲓ̈· ⲁⲗⲗⲁ ⲛⲉⲛⲙⲏⲛ ⲡⲉ ⲉⲩ[ⲙⲉ]ⲗⲉ‐ <text:line-break/><text:span text:style-name="T1"> </text:span><text:span text:style-name="T2">(8/11) </text:span> ⲧⲏ ⲛ̅ⲧⲉ ⲡⲛⲁϩⲧⲉ· ⲉⲛⲧⲁⲩⲟ ⲛ̅ⲛⲓ‐ <text:line-break/><text:span text:style-name="T1"> </text:span><text:span text:style-name="T2">(8/12) </text:span> ⲗⲏⲥⲧⲏⲥ ⲉⲧ{ϩ̅ⲓ} ⲡⲙⲟⲉⲓⲧ’ ⲉⲧⲁⲛⲣ̅ <text:line-break/><text:span text:style-name="T1"> </text:span><text:span text:style-name="T2">(8/13) </text:span> ⲃⲟⲗ ⲉⲣⲟⲟⲩ· ⲉⲓⲥ ϩⲏⲏⲧⲉ ⲁϥ{ⲉ̅ⲓ} ⲉⲃⲟⲗ <text:line-break/><text:span text:style-name="T1"> </text:span><text:span text:style-name="T2">(8/14) </text:span> ⲛ̅ϭⲓ ⲗⲓⲑⲁⲣⲅⲟⲏⲗ ⲉϥϣⲃ̅ⲃⲓⲟⲉⲓⲧ’ ⲛ̅ⲧⲟⲟ‐ <text:line-break/><text:span text:style-name="T1"> </text:span><text:span text:style-name="T2">(8/15) </text:span> ⲧⲛ̅· ⲉϥⲟ ⲙ̅ⲡⲉⲥⲙⲟⲧ’ ⲛ̅ⲟⲩⲥⲁⲉⲓⲛ <text:line-break/><text:span text:style-name="T1"> </text:span><text:span text:style-name="T2">(8/16) </text:span> ⲉⲟⲩⲛ̅ ⲟⲩⲛⲁⲣⲧⲟⲥ ⲙ̅ⲡⲁϩⲣⲉ ϩⲁ <text:line-break/><text:span text:style-name="T1"> </text:span><text:span text:style-name="T2">(8/17) </text:span> ⲡⲉϥϫⲟ· ⲉⲩⲛ̅ ⲟⲩⲁⲗⲟⲩ ⲛ̅ⲥⲃⲟⲩⲉⲓ <text:line-break/><text:span text:style-name="T1"> </text:span><text:span text:style-name="T2">(8/18) </text:span> ⲙⲟⲟϣⲉ ⲛ̅ⲥⲱϥ ⲉϥϥⲓ ⲛ̅ⲟⲩⲅⲗⲟⲥ‐ <text:line-break/><text:span text:style-name="T1"> </text:span><text:span text:style-name="T2">(8/19) </text:span> ⲥⲟⲕⲱⲙⲟⲛ ⲉϥⲙⲉϩ ⲙ̅ⲡⲁϩⲣⲉ <text:line-break/><text:span text:style-name="T1"> </text:span><text:span text:style-name="T2">(8/20) </text:span> ⲁⲛⲟⲛ ⲙ̅ⲡⲛ̅ⲥⲟⲩⲱⲛϥ̅ ⲁϥⲟⲩⲱ‐ <text:line-break/><text:span text:style-name="T1"> </text:span><text:span text:style-name="T2">(8/21) </text:span> ϣⲃ̅ ⲛ̅ϭⲓ ⲡⲉⲧⲣⲟⲥ ⲡⲉϫⲁϥ ⲛⲁϥ ϫⲉ <text:line-break/><text:span text:style-name="T1"> </text:span><text:span text:style-name="T2">(8/22) </text:span> ⲧⲛ̅ⲟⲩⲱϣⲉ ⲉⲧⲣⲉⲕⲣ̅ ⲟⲩⲙⲛ̅ⲧ’‐ <text:line-break/><text:span text:style-name="T1"> </text:span><text:span text:style-name="T2">(8/23) </text:span> ⲙⲁⲉⲓⲣⲱⲙⲉ ⲛⲙ̅ⲙⲁⲛ ϫⲉ ⲁⲛⲟⲛ <text:line-break/><text:span text:style-name="T1"> </text:span><text:span text:style-name="T2">(8/24) </text:span> ϩⲉⲛϣⲙ̅ⲙⲟ ⲛ̅ⲅ’ϫⲓⲧⲛ̅ ⲉⲡⲏⲉⲓ ⲛ̅ⲗⲓ‐ <text:line-break/><text:span text:style-name="T1"> </text:span><text:span text:style-name="T2">(8/25) </text:span> ⲑⲁⲣⲅⲟⲏⲗ ⲉⲙⲡⲁⲧⲉⲣⲟⲩϩⲉ ϣⲱ‐ <text:line-break/><text:span text:style-name="T1"> </text:span><text:span text:style-name="T2">(8/26) </text:span> ⲡⲉ· ⲡⲉϫⲁϥ ϫⲉ ϩⲛ̅ ⲟⲩⲥⲟⲟⲩⲧⲛ̅ <text:line-break/><text:span text:style-name="T1"> </text:span><text:span text:style-name="T2">(8/27) </text:span> ⲛ̅ϩⲏⲧ’ ϯⲛⲁⲧⲁⲙⲱⲧⲛ̅ ⲉⲣⲟϥ· <text:line-break/><text:span text:style-name="T1"> </text:span><text:span text:style-name="T2">(8/28) </text:span> ⲁⲗⲗⲁ ϯⲣ̅ ϣⲡⲏⲣⲉ ϫⲉ ⲡⲱⲥ ⲁⲧⲉ‐ <text:line-break/><text:span text:style-name="T1"> </text:span><text:span text:style-name="T2">(8/29) </text:span> ⲧⲛ̅ⲥⲟⲩⲱⲛ ⲡⲓⲁⲅⲁⲑⲟⲥ ⲛ̅ⲣⲱⲙⲉ <text:line-break/><text:span text:style-name="T1"> </text:span><text:span text:style-name="T2">(8/30) </text:span> ⲉⲙⲁϥⲟⲩⲟⲛϩϥ̅ ⲅⲁⲣ ⲛ̅ⲧⲟϥ ⲉⲣⲱ‐ <text:line-break/><text:span text:style-name="T1"> </text:span><text:span text:style-name="T2">(8/31) </text:span> ⲙⲉ ⲛⲓⲙ· ⲉⲃⲟⲗ ϫⲉ ⲛ̅ⲧⲟϥ ϩⲱⲱϥ <text:line-break/><text:span text:style-name="T1"> </text:span><text:span text:style-name="T2">(8/32) </text:span> ⲡϣⲏⲣⲉ ⲛ̅ⲟⲩⲛⲟϭ ⲛ̅ⲣ̅ⲣⲟ ⲡⲉ· <text:line-break/><text:span text:style-name="T1"> </text:span><text:span text:style-name="T2">(8/33) </text:span> ⲙ̅ⲧⲟⲛ ⲙ̅ⲙⲱⲧⲛ̅ ⲛ̅ⲟⲩⲕⲟⲩⲉⲓ ⲛ̅‐ <text:line-break/><text:span text:style-name="T1"> </text:span><text:span text:style-name="T2">(8/34) </text:span> ⲧⲁⲃⲱⲕ ⲛ̅ⲧⲁⲣ̅ ⲡⲁϩⲣⲉ ⲉⲡⲉⲓ̈ⲣⲱ‐ <text:line-break/><text:span text:style-name="T1"> </text:span><text:span text:style-name="T2">(8/35) </text:span> ⲙⲉ ⲛ̅ⲧⲁ{ⲉ̅ⲓ}· ⲁϥⲉⲗⲱⲗ ⲙ̅ⲙⲟϥ ⲁϥ{ⲉⲓ} <text:line-break/><text:span text:style-name="T1"> </text:span><text:span text:style-name="T2">(9/1) </text:span> [ⲧ]ⲁⲭⲩ ⲡⲉϫⲁϥ ⲙ̅ⲡ̣ⲉⲧⲣⲟⲥ· ϫⲉ <text:line-break/><text:span text:style-name="T1"> </text:span><text:span text:style-name="T2">(9/2) </text:span> [ⲡ]ⲉ̣ⲧⲣⲟⲥ· ⲁϥⲛⲟⲩϣⲡ̅ ⲇⲉ ⲛ̅ϭⲓ <text:line-break/><text:span text:style-name="T1"> </text:span><text:span text:style-name="T2">(9/3) </text:span> ⲡ̣ⲉⲧⲣⲟⲥ ϫⲉ ⲡⲱⲥ ⲁϥⲥⲟⲩⲱⲛ <text:line-break/><text:span text:style-name="T1"> </text:span><text:span text:style-name="T2">(9/4) </text:span> ⲡⲉϥⲣⲁⲛ ϫⲉ ⲡⲉⲧⲣⲟⲥ· ⲁϥⲟⲩ‐ <text:line-break/><text:span text:style-name="T1"> </text:span><text:span text:style-name="T2">(9/5) </text:span> ⲱϣⲃ̅ ⲛ̅ϭⲓ ⲡⲉⲧⲣⲟⲥ ⲙ̅ⲡⲥⲱⲧⲏⲣ <text:line-break/><text:span text:style-name="T1"> </text:span><text:span text:style-name="T2">(9/6) </text:span> ϫⲉ ⲉⲕⲥⲟⲟⲩⲛ ⲙ̅ⲙⲟⲉⲓ ⲧⲱⲛ <text:line-break/><text:span text:style-name="T1"> </text:span><text:span text:style-name="T2">(9/7) </text:span> ϫⲉ ⲁⲕⲙⲟⲩⲧⲉ ⲙ̅ⲡⲁⲣⲁⲛ· ⲁϥ‐ <text:line-break/><text:span text:style-name="T1"> </text:span><text:span text:style-name="T2">(9/8) </text:span> ⲟⲩⲱϣⲃ̅ ⲛ̅ϭⲓ ⲗⲓⲑⲁⲣⲅⲟⲏⲗ ϫⲉ ϯ‐ <text:line-break/><text:span text:style-name="T1"> </text:span><text:span text:style-name="T2">(9/9) </text:span> ⲟⲩⲱϣ ϣⲛ̅ⲧⲕ̅ ϫⲉ ⲛⲓⲙ ⲁϥϯ ⲡⲓ‐ <text:line-break/><text:span text:style-name="T1"> </text:span><text:span text:style-name="T2">(9/10) </text:span> ⲣⲁⲛ ⲉⲣⲟⲕ ϫⲉ ⲡⲉⲧⲣⲟⲥ· ⲡⲉ‐ <text:line-break/><text:soft-page-break/><text:span text:style-name="T1"> </text:span><text:span text:style-name="T2">(9/11) </text:span> ϫⲁϥ ⲛⲁϥ ϫⲉ ⲓ̅ⲥ̅ ⲡⲉⲭ̅ⲥ̅ ⲡⲉ ⲡϣⲏ‐ <text:line-break/><text:span text:style-name="T1"> </text:span><text:span text:style-name="T2">(9/12) </text:span> ⲣⲉ ⲙ̅ⲡⲛⲟⲩⲧⲉ ⲉⲧⲟⲛϩ̅ ⲛ̅ⲧⲟϥ <text:line-break/><text:span text:style-name="T1"> </text:span><text:span text:style-name="T2">(9/13) </text:span> ⲁϥϯ ⲡⲓⲣⲁⲛ ⲉⲣⲟⲉⲓ· ⲁϥⲟⲩⲱϣⲃ̅ <text:line-break/><text:span text:style-name="T1"> </text:span><text:span text:style-name="T2">(9/14) </text:span> ⲡⲉϫⲁϥ ϫⲉ ⲁⲛⲟⲕ ⲡⲉ ⲥⲟⲩⲱⲛⲧ̅’ <text:line-break/><text:span text:style-name="T1"> </text:span><text:span text:style-name="T2">(9/15) </text:span> ⲡⲉⲧⲣⲉ· ⲁϥⲃⲟϣϥ̅ ⲛ̅ϯϩⲃ̅ⲥⲱ <text:line-break/><text:span text:style-name="T1"> </text:span><text:span text:style-name="T2">(9/16) </text:span> ⲉⲧⲥ̅ⲧⲟⲉ {ϩ̅ⲓ}ⲱⲱϥ ⲧⲁⲓ̈ ⲉⲧⲁϥϣⲃ̅‐ <text:line-break/><text:span text:style-name="T1"> </text:span><text:span text:style-name="T2">(9/17) </text:span> ⲧϥ̅ ⲛ̅ⲧⲟⲟⲧⲛ̅ ⲛ̅ϩⲏⲧⲥ̅ ⲉ{ⲧⲁ}ϥⲟⲩ‐ <text:line-break/><text:span text:style-name="T1"> </text:span><text:span text:style-name="T2">(9/18) </text:span> ⲱⲛϩ̅ ⲉⲣⲟⲛ ϩⲛ̅ ⲟⲩⲙⲛ̅ⲧⲙⲉ ϫⲉ <text:line-break/><text:span text:style-name="T1"> </text:span><text:span text:style-name="T2">(9/19) </text:span> ⲛ̅ⲧⲟϥ ⲡⲉ· ⲁⲛⲡⲁϩⲧⲛ̅ ⲉϫⲙ̅ <text:line-break/><text:span text:style-name="T1"> </text:span><text:span text:style-name="T2">(9/20) </text:span> ⲡⲕⲁϩ ⲁⲛⲟⲩⲱϣⲧ̅’ ⲙ̅ⲙⲟϥ ⲁⲛⲟⲛ <text:line-break/><text:span text:style-name="T1"> </text:span><text:span text:style-name="T2">(9/21) </text:span> ⲛⲉⲛⲙⲁϩ ⲙⲛ̅ⲧ’ⲟⲩⲉ ⲙ̅ⲙⲁⲑⲏ‐ <text:line-break/><text:span text:style-name="T1"> </text:span><text:span text:style-name="T2">(9/22) </text:span> ⲧⲏⲥ· ⲁϥⲥⲟⲩⲧⲛ̅ ⲧⲉϥϭⲓϫ ⲉⲃⲟⲗ <text:line-break/><text:span text:style-name="T1"> </text:span><text:span text:style-name="T2">(9/23) </text:span> ⲁϥⲧⲁϩⲟⲛ ⲉⲣⲁⲧⲛ̅ ⲁⲛϣⲁϫⲉ ⲛⲙ̅‐ <text:line-break/><text:span text:style-name="T1"> </text:span><text:span text:style-name="T2">(9/24) </text:span> ⲙⲁϥ ϩⲛ̅ ⲟⲩⲑⲃ̅ⲃⲓⲟ· ⲛⲉⲣⲉϫⲱⲛ <text:line-break/><text:span text:style-name="T1"> </text:span><text:span text:style-name="T2">(9/25) </text:span> ϭⲟⲗϫ̅ ⲉⲡⲓⲧⲛ̅ ϩⲛ̅ ⲟⲩⲙⲛ̅ⲧ’ϫⲡⲓ‐ <text:line-break/><text:span text:style-name="T1"> </text:span><text:span text:style-name="T2">(9/26) </text:span> ⲏⲧ’ ⲉⲛϫⲱ ⲙ̅ⲙⲟⲥ ϫⲉ ⲡⲉⲧⲉⲕ‐ <text:line-break/><text:span text:style-name="T1"> </text:span><text:span text:style-name="T2">(9/27) </text:span> ⲟⲩⲟϣϥ̅ ⲧⲛ̅ⲛⲁⲁⲁϥ· ⲁⲗⲗⲁ ⲙⲁ‐ <text:line-break/><text:span text:style-name="T1"> </text:span><text:span text:style-name="T2">(9/28) </text:span> ϯ ⲛⲁⲛ ⲛ̅ⲟⲩϭⲟⲙ ⲉⲧⲣⲉⲛⲉⲓⲣⲉ <text:line-break/><text:span text:style-name="T1"> </text:span><text:span text:style-name="T2">(9/29) </text:span> ⲙ̅ⲡⲉⲧⲉϩⲛⲁⲕ ⲛ̅ⲥⲏⲟⲩ ⲛⲓⲙ· <text:line-break/><text:span text:style-name="T1"> </text:span><text:span text:style-name="T2">(9/30) </text:span> ⲁϥϯ ⲛⲁⲩ ⲙ̅ⲡⲓⲛⲁⲣⲇⲟⲥ ⲛ̅ⲧⲉ <text:line-break/><text:span text:style-name="T1"> </text:span><text:span text:style-name="T2">(9/31) </text:span> ϯⲙⲛ̅ⲧ’ⲥⲁⲉⲓ〈ⲛ〉 ⲙⲛ̅ ⲡⲓⲅⲗⲟⲥⲥⲟ‐ <text:line-break/><text:span text:style-name="T1"> </text:span><text:span text:style-name="T2">(9/32) </text:span> ⲕⲱⲙⲟⲛ ⲉⲧⲛ̅ⲧⲟⲟⲧϥ̅ ⲙ̅ⲡⲓⲁⲗⲟⲩ <text:line-break/><text:span text:style-name="T1"> </text:span><text:span text:style-name="T2">(9/33) </text:span> ⲁϥⲡⲁⲣⲁⲅ’ⲅⲓⲗⲉ ⲛⲁⲩ ⲙ̅ⲡⲓⲣⲏⲧⲉ <text:line-break/><text:span text:style-name="T1"> </text:span><text:span text:style-name="T2">(10/1) </text:span> ⲉϥϫⲱ ⲙ̅ⲙⲟ[ⲥ] ϫ̣ⲉ ⲃⲱⲕ ⲉϩⲟⲩ̣ⲛ [ⲉϯ]‐ <text:line-break/><text:span text:style-name="T1"> </text:span><text:span text:style-name="T2">(10/2) </text:span> ⲡⲟⲗⲓⲥ ⲉⲧⲁⲧⲉⲧⲛ̅{ⲉ̅ⲓ} ⲉⲃⲟⲗ ⲛ̅ϩ̣[ⲏ]ⲧ̣ⲥ̅· <text:line-break/><text:span text:style-name="T1"> </text:span><text:span text:style-name="T2">(10/3) </text:span> ⲧⲁⲓ̈ ⲉⲧⲟⲩⲙⲟⲩⲧⲉ ⲉⲣⲟⲥ ϫⲉ ϭⲱⲣϭ̅ <text:line-break/><text:span text:style-name="T1"> </text:span><text:span text:style-name="T2">(10/4) </text:span> ⲙⲟⲩⲛ ⲉⲩϩⲩⲡⲟⲙⲟⲛⲏ ⲉⲧⲉⲧⲛ̅ϯ <text:line-break/><text:span text:style-name="T1"> </text:span><text:span text:style-name="T2">(10/5) </text:span> ⲥⲃⲱ ⲛ̅ⲛⲁⲓ̈ ⲧⲏⲣⲟⲩ ⲉⲧⲁⲩⲛⲁϩⲧⲉ <text:line-break/><text:span text:style-name="T1"> </text:span><text:span text:style-name="T2">(10/6) </text:span> ⲉⲡⲁⲣⲁⲛ· ϫⲉ ⲁⲉⲓⲣ̅ϩⲩⲡⲟⲙⲓⲛⲉ <text:line-break/><text:span text:style-name="T1"> </text:span><text:span text:style-name="T2">(10/7) </text:span> ϩⲛ̅ ϩⲉⲛ{ϩ̅ⲓ}ⲥⲉ ⲛ̅ⲧⲉ ⲡⲓⲛⲁϩⲧⲉ· ⲁⲛⲟⲕ <text:line-break/><text:span text:style-name="T1"> </text:span><text:span text:style-name="T2">(10/8) </text:span> ϯⲛⲁϯ ⲛⲏⲧⲛ̅ ⲙ̅ⲡⲉⲧⲛ̅ⲃⲉⲕⲉ· ⲛⲓ‐ <text:line-break/><text:span text:style-name="T1"> </text:span><text:span text:style-name="T2">(10/9) </text:span> ϩⲏⲕⲉ ⲛ̅ϯⲡⲟⲗⲓⲥ ⲉⲧⲙ̅ⲙⲁⲩ ϯ ⲛⲁⲩ <text:line-break/><text:span text:style-name="T1"> </text:span><text:span text:style-name="T2">(10/10) </text:span> ⲛ̅ⲧⲟⲩⲭⲣⲓⲁ {ϩ̅ⲓ}ⲛⲁ ⲉⲩⲛⲁⲱⲛϩ̅ ⲉⲣⲟⲥ· <text:line-break/><text:span text:style-name="T1"> </text:span><text:span text:style-name="T2">(10/11) </text:span> ϣⲁⲛϯϯ ⲛⲁⲩ ⲙ̅ⲡⲏ ⲉⲧ’ⲥⲟⲧⲡ̅’· <text:line-break/><text:span text:style-name="T1"> </text:span><text:span text:style-name="T2">(10/12) </text:span> ⲡⲏ ⲉⲧⲁⲉⲓϫⲟⲟϥ ⲛⲏⲧⲛ̅ ϫⲉ ϯⲛⲁⲧⲁ‐ <text:line-break/><text:span text:style-name="T1"> </text:span><text:span text:style-name="T2">(10/13) </text:span> ⲁϥ ⲛⲏⲧⲛ̅ ⲛ̅ϫⲓⲛϫⲏ· ⲁϥⲟⲩⲱϣⲃ̅ <text:line-break/><text:span text:style-name="T1"> </text:span><text:span text:style-name="T2">(10/14) </text:span> ⲛ̅ϭⲓ ⲡⲉⲧⲣⲟⲥ ⲡⲉϫⲁϥ ⲛⲁϥ ϫⲉ ⲡϫⲟ‐ <text:line-break/><text:span text:style-name="T1"> </text:span><text:span text:style-name="T2">(10/15) </text:span> ⲉⲓⲥ ⲛ̅ⲧⲟⲕ ⲁⲕϯ ⲥⲃⲱ ⲛⲁⲛ ⲉⲣ̅ⲁ‐ <text:line-break/><text:span text:style-name="T1"> </text:span><text:span text:style-name="T2">(10/16) </text:span> ⲡⲟⲧⲁⲥⲥⲉ ⲙ̅ⲡⲓⲕⲟⲥⲙⲟⲥ ⲙⲛ̅ ⲛ̅‐ <text:line-break/><text:span text:style-name="T1"> </text:span><text:span text:style-name="T2">(10/17) </text:span> ⲕⲁ ⲛⲓⲙ ⲉⲧⲛ̅ⲧⲁϥ ⲁⲛⲕⲁⲁⲩ ⲛ̅ⲥⲱⲛ <text:line-break/><text:span text:style-name="T1"> </text:span><text:span text:style-name="T2">(10/18) </text:span> ⲉⲧⲃⲏⲏⲧⲕ̅· ⲑⲣⲉ ⲛ̅ⲟⲩϩⲟⲟⲩ ⲟⲩ‐ <text:line-break/><text:span text:style-name="T1"> </text:span><text:span text:style-name="T2">(10/19) </text:span> ⲱⲧ’ ⲡⲉⲧⲛ̅ϥⲓ ⲙ̅ⲡⲉⲥⲣⲟⲟⲩϣ· <text:line-break/><text:span text:style-name="T1"> </text:span><text:span text:style-name="T2">(10/20) </text:span> ⲉⲛⲁϣ ϭⲛ̅ ϯⲭⲣⲓⲁ ⲧⲱⲛ ⲉⲧⲕ̅ϣⲓⲛⲉ <text:line-break/><text:span text:style-name="T1"> </text:span><text:span text:style-name="T2">(10/21) </text:span> ⲙ̅ⲙⲟⲛ ⲉⲣⲟⲥ ⲉⲧⲁⲁⲥ ⲛ̅ⲛ̅ϩⲏⲕⲉ· <text:line-break/><text:span text:style-name="T1"> </text:span><text:span text:style-name="T2">(10/22) </text:span> ⲁϥⲟⲩⲱϣⲃ̅ ⲛ̅ϭⲓ ⲡϫⲟⲉⲓⲥ ⲡⲉϫⲁϥ <text:line-break/><text:span text:style-name="T1"> </text:span><text:span text:style-name="T2">(10/23) </text:span> ϫⲉ ⲱ ⲡⲉⲧⲣⲉ ⲛⲉⲥⲙ̅ⲡϣⲁ ⲡⲉ <text:line-break/><text:span text:style-name="T1"> </text:span><text:span text:style-name="T2">(10/24) </text:span> ⲉⲧⲣⲉⲕⲥⲟⲩⲱⲛ ϯⲡⲁⲣⲁⲃⲟⲗⲏ <text:line-break/><text:soft-page-break/><text:span text:style-name="T1"> </text:span><text:span text:style-name="T2">(10/25) </text:span> ⲉⲧⲁⲉⲓϫⲟⲟⲥ ⲛⲁⲕ· ⲕⲥⲟⲟⲩⲛ ⲁⲛ <text:line-break/><text:span text:style-name="T1"> </text:span><text:span text:style-name="T2">(10/26) </text:span> ϫⲉ ⲡⲁⲣⲁⲛ ⲉⲧⲕ̅ϯ ⲥⲃⲱ ⲙ̅ⲙⲟϥ <text:line-break/><text:span text:style-name="T1"> </text:span><text:span text:style-name="T2">(10/27) </text:span> ϥⲟⲩⲟⲧⲃ̅ ⲉⲙⲛ̅ⲧⲣⲙ̅ⲙⲁⲟ ⲛⲓⲙ· <text:line-break/><text:span text:style-name="T1"> </text:span><text:span text:style-name="T2">(10/28) </text:span> ⲁⲩⲱ ⲧⲥⲟⲫⲓⲁ ⲛ̅ⲧⲉ ⲡⲛⲟⲩⲧⲉ <text:line-break/><text:span text:style-name="T1"> </text:span><text:span text:style-name="T2">(10/29) </text:span> ⲥⲟⲩⲟⲧⲃ̅ ⲉⲡⲛⲟⲩⲃ ⲙⲛ̅ ⲫⲁⲧ’ <text:line-break/><text:span text:style-name="T1"> </text:span><text:span text:style-name="T2">(10/30) </text:span> ⲙⲛ̅ ⲡⲱⲛⲉ ⲉⲧⲉ ⲛⲁϣⲉ ⲥⲟⲩⲛ̅ⲧϥ̅· <text:line-break/><text:span text:style-name="T1"> </text:span><text:span text:style-name="T2">(10/31) </text:span> ⲁϥϯ ⲛⲁⲩ ⲙ̅ⲡⲓⲅⲗⲟⲥⲥⲟⲕⲱⲙⲟⲛ <text:line-break/><text:span text:style-name="T1"> </text:span><text:span text:style-name="T2">(10/32) </text:span> ⲛ̅ⲧⲉ ⲛⲓⲡⲁϩⲣⲉ ⲉϥϫⲱ ⲙ̅ⲙⲟⲥ ϫⲉ <text:line-break/><text:span text:style-name="T1"> </text:span><text:span text:style-name="T2">(10/33) </text:span> ⲁⲣⲓ ⲡⲁϩⲣⲉ ⲉⲛⲓⲣⲉϥϣⲱⲛⲉ ⲧⲏ <text:line-break/><text:span text:style-name="T1"> </text:span><text:span text:style-name="T2">(10/34) </text:span> ⲣⲟⲩ ⲛ̅ⲧⲉ ϯⲡⲟⲗⲓⲥ ⲛⲏ ⲉⲧ’ⲛⲁϩⲧⲉ <text:line-break/><text:span text:style-name="T1"> </text:span><text:span text:style-name="T2">(11/1) </text:span> [ⲉ]ⲡ̣ⲁ̣ⲣⲁⲛ· ⲁϥⲣ̅ ϩⲟⲧⲉ ⲛ̅ϭⲓ ⲡⲉⲧⲣⲟⲥ <text:line-break/><text:span text:style-name="T1"> </text:span><text:span text:style-name="T2">(11/2) </text:span> [ⲉ]ⲟⲩⲁϩⲙⲉϥ ⲉⲣⲟϥ ⲙ̅ⲡⲙⲉϩⲥⲉⲡ <text:line-break/><text:span text:style-name="T1"> </text:span><text:span text:style-name="T2">(11/3) </text:span> [ⲥ]ⲛⲁⲩ· ⲁϥⲕⲓⲙ ⲉⲡⲏ ⲉⲧ’{ϩ̅ⲓ}ⲧⲟⲩ‐ <text:line-break/><text:span text:style-name="T1"> </text:span><text:span text:style-name="T2">(11/4) </text:span> ⲱϥ ⲉⲧⲉ ⲓ̈ⲱϩⲁⲛⲛⲏⲥ ⲡⲉ ϫⲉ ϣⲁ‐ <text:line-break/><text:span text:style-name="T1"> </text:span><text:span text:style-name="T2">(11/5) </text:span> ϫⲉ ϩⲱⲱⲕ ⲙ̅ⲡⲓⲥⲟⲡ’· ⲁϥⲟⲩⲱ‐ <text:line-break/><text:span text:style-name="T1"> </text:span><text:span text:style-name="T2">(11/6) </text:span> ϣⲃ̅ ⲛ̅ϭⲓ ⲓ̈ⲱϩⲁⲛⲛⲏⲥ ⲡⲉϫⲁϥ <text:line-break/><text:span text:style-name="T1"> </text:span><text:span text:style-name="T2">(11/7) </text:span> ϫⲉ ⲡϫⲟⲉⲓⲥ ⲧⲛ̅ⲣ̅ ϩⲟⲧⲉ ϩⲁ ⲧⲉⲕ‐ <text:line-break/><text:span text:style-name="T1"> </text:span><text:span text:style-name="T2">(11/8) </text:span> ⲉϩⲏ ⲉϫⲉ ⲟⲩⲙⲏⲏϣⲉ ⲛ̅ϣⲁϫⲉ· <text:line-break/><text:span text:style-name="T1"> </text:span><text:span text:style-name="T2">(11/9) </text:span> ⲁⲗⲗⲁ ⲛ̅ⲧⲟⲕ ⲉⲧ’ϣⲓⲛⲉ ⲙ̅ⲙⲟⲛ <text:line-break/><text:span text:style-name="T1"> </text:span><text:span text:style-name="T2">(11/10) </text:span> ⲉⲧⲉⲓ̈ⲧⲉⲭⲛⲏ ⲉⲁⲁⲥ ⲙ̅ⲡⲟⲩⲧⲥⲉ‐ <text:line-break/><text:span text:style-name="T1"> </text:span><text:span text:style-name="T2">(11/11) </text:span> ⲃⲟⲛ ⲉⲣⲟⲥ ⲉⲣ̅ ⲥⲁⲉⲓⲛ· ⲡⲱⲥ ϭⲉ <text:line-break/><text:span text:style-name="T1"> </text:span><text:span text:style-name="T2">(11/12) </text:span> ⲧⲛ̅ⲛⲁⲙ̅ⲙⲉ ⲉⲣ̅ ⲡⲁϩⲣⲉ ⲉϩⲉⲛⲥⲱ‐ <text:line-break/><text:span text:style-name="T1"> </text:span><text:span text:style-name="T2">(11/13) </text:span> ⲙⲁ ⲕⲁⲧⲁ ⲡⲣⲏⲧⲉ ⲉⲧⲁⲕϫⲟⲟⲥ ⲛⲁⲛ· <text:line-break/><text:span text:style-name="T1"> </text:span><text:span text:style-name="T2">(11/14) </text:span> ⲁϥⲟⲩⲱϣⲃ̅ ⲛⲁϥ ϫⲉ ⲕⲁⲗⲱⲥ ⲁⲕ‐ <text:line-break/><text:span text:style-name="T1"> </text:span><text:span text:style-name="T2">(11/15) </text:span> ϫⲟⲟⲥ ⲓ̈ⲱϩⲁⲛⲛⲏⲥ ϫⲉ ϯⲥⲟⲟⲩⲛ <text:line-break/><text:span text:style-name="T1"> </text:span><text:span text:style-name="T2">(11/16) </text:span> ϫⲉ ⲛ̅ⲥⲁⲉⲓⲛ ⲛ̅ⲧⲉ ⲡⲓⲕⲟⲥⲙⲟⲥ <text:line-break/><text:span text:style-name="T1"> </text:span><text:span text:style-name="T2">(11/17) </text:span> ⲉϣⲁⲩⲣ̅ ⲡⲁϩⲣⲉ ⲉⲛⲁ ⲡⲕⲟⲥⲙⲟⲥ· <text:line-break/><text:span text:style-name="T1"> </text:span><text:span text:style-name="T2">(11/18) </text:span> ⲛⲓⲥⲁⲉⲓⲛ ⲛ̅ⲧⲟⲟⲩ ⲛ̅ⲧⲉ ⲛⲓⲯⲩⲭⲏ <text:line-break/><text:span text:style-name="T1"> </text:span><text:span text:style-name="T2">(11/19) </text:span> ⲉϣⲁⲩⲣ̅ ⲡⲁϩⲣⲉ ⲉⲡⲓϩⲏⲧ’· ⲁⲣⲓ ⲡⲁ‐ <text:line-break/><text:span text:style-name="T1"> </text:span><text:span text:style-name="T2">(11/20) </text:span> ϩⲣⲉ ⲟⲩⲛ ⲉⲛⲓⲥⲱⲙⲁ ⲛ̅ϣⲟⲣⲡ̅’ ϫⲉ‐ <text:line-break/><text:span text:style-name="T1"> </text:span><text:span text:style-name="T2">(11/21) </text:span> ⲕⲁⲁⲥ ⲉⲃⲟⲗ {ϩ̅ⲓ}ⲧⲟⲟⲧⲟⲩ ⲛ̅ⲛⲓ‐ <text:line-break/><text:span text:style-name="T1"> </text:span><text:span text:style-name="T2">(11/22) </text:span> ϭⲟⲙ ⲉⲧ’ϣⲟⲟⲡ’ ⲛ̅ⲧⲉ ⲡⲓⲧⲁⲗϭⲟ <text:line-break/><text:span text:style-name="T1"> </text:span><text:span text:style-name="T2">(11/23) </text:span> ⲙ̅ⲡⲟⲩⲥⲱⲙⲁ ⲁϫⲛ̅ ⲡⲁϩⲣⲉ ⲛ̅ⲧⲉ <text:line-break/><text:span text:style-name="T1"> </text:span><text:span text:style-name="T2">(11/24) </text:span> ⲡⲓⲁⲓⲱⲛ ⲡⲁⲓ̈ ⲛ̅ⲥⲉⲛⲁϩⲧⲉ ⲉⲣⲱⲧⲛ̅· <text:line-break/><text:span text:style-name="T1"> </text:span><text:span text:style-name="T2">(11/25) </text:span> ϫⲉ ⲟⲩⲛ̅ ϣϭⲟⲙ ⲙ̅ⲙⲱⲧⲛ̅ ⲉⲧⲁⲗϭⲉ <text:line-break/><text:span text:style-name="T1"> </text:span><text:span text:style-name="T2">(11/26) </text:span> ⲛⲓⲕⲉϣⲱⲛⲉ ⲛ̅ⲧⲉ ⲛ̅ϩⲏⲧ’· ⲛⲓⲣⲙ̅‐ <text:line-break/><text:span text:style-name="T1"> </text:span><text:span text:style-name="T2">(11/27) </text:span> ⲙⲁⲟ ⲛ̅ⲧⲟⲟⲩ ⲛ̅ⲧⲉ ϯⲡⲟⲗⲓⲥ ⲛⲏ <text:line-break/><text:span text:style-name="T1"> </text:span><text:span text:style-name="T2">(11/28) </text:span> ⲛ̅ⲧⲟⲟⲩ ⲉⲧⲉ ⲙ̅ⲡⲟⲩⲙ̅ⲡϣⲁ <text:line-break/><text:span text:style-name="T1"> </text:span><text:span text:style-name="T2">(11/29) </text:span> ⲣⲱ ⲉϣⲛ̅ⲧ’ ⲉϩⲣⲁⲓ̈· ⲁⲗⲗⲁ ⲉⲩ‐ <text:line-break/><text:span text:style-name="T1"> </text:span><text:span text:style-name="T2">(11/30) </text:span> ⲟⲩⲛⲟϥ ⲙ̅ⲙⲟⲟⲩ ϩⲛ̅ ⲧⲉⲩⲙⲛ̅‐ <text:line-break/><text:span text:style-name="T1"> </text:span><text:span text:style-name="T2">(11/31) </text:span> ⲧⲣⲙ̅ⲙⲁⲟ ⲙⲛ̅ ⲧⲉⲩⲙⲛ̅ⲧ’ⲥⲁϣ‐ <text:line-break/><text:span text:style-name="T1"> </text:span><text:span text:style-name="T2">(11/32) </text:span> ⲣⲱⲙⲉ· ⲛⲁⲓ̈ ⲟⲩⲛ ⲙ̅ⲡⲓⲣⲏⲧⲉ <text:line-break/><text:span text:style-name="T1"> </text:span><text:span text:style-name="T2">(12/1) </text:span> ⲙ̅ⲡⲣ̅ⲟⲩⲱⲙ ⲛⲙ̅ⲙⲁⲩ ϩⲙ̅ ⲡ̣ⲟ[ⲩ]ⲏⲓ̣ <text:line-break/><text:span text:style-name="T1"> </text:span><text:span text:style-name="T2">(12/2) </text:span> ⲟⲩⲇⲉ ⲙ̅ⲡⲣ̅ⲣ̅ ϣⲃⲏⲣ ⲉⲣⲟⲟⲩ· [ⲛ̅]‐ <text:line-break/><text:span text:style-name="T1"> </text:span><text:span text:style-name="T2">(12/3) </text:span> ⲛⲉⲥϣⲱⲡⲉ ⲛⲏⲧⲛ̅ ⲛ̅ϭⲓ ⲧⲟⲩⲙⲛ̅‐ <text:line-break/><text:span text:style-name="T1"> </text:span><text:span text:style-name="T2">(12/4) </text:span> ⲧⲣⲉϥϫⲓ ϩⲟ· ϫⲉ ⲁⲩⲙⲏⲏϣⲉ ⲅⲁⲣ <text:line-break/><text:span text:style-name="T1"> </text:span><text:span text:style-name="T2">(12/5) </text:span> ϫⲉⲓ ⲡϩⲟ ⲛ̅ⲛⲓⲣⲙ̅ⲙⲁⲟ ⲉⲃⲟⲗ ϫⲉ <text:line-break/><text:soft-page-break/><text:span text:style-name="T1"> </text:span><text:span text:style-name="T2">(12/6) </text:span> ⲥⲉⲣ̅ ⲛⲟⲃⲉ ϩⲱⲟⲩ ϩⲛ̅ ⲛⲓⲉⲕⲕⲗⲏ‐ <text:line-break/><text:span text:style-name="T1"> </text:span><text:span text:style-name="T2">(12/7) </text:span> ⲥⲓⲁ· ⲁⲩⲱ ⲥⲉϯ ⲙⲟⲉⲓⲧ’ ⲛ̅ϩⲉⲛ‐ <text:line-break/><text:span text:style-name="T1"> </text:span><text:span text:style-name="T2">(12/8) </text:span> ⲕⲟⲟⲩⲉ ⲉⲉⲓⲣⲉ· ⲁⲗⲗⲁ ϯ ϩⲁⲡ’ <text:line-break/><text:span text:style-name="T1"> </text:span><text:span text:style-name="T2">(12/9) </text:span> ⲉⲣⲟⲟⲩ ϩⲛ̅ ⲟⲩⲥⲟⲟⲩⲧⲛ̅· ϫⲉ‐ <text:line-break/><text:span text:style-name="T1"> </text:span><text:span text:style-name="T2">(12/10) </text:span> ⲕⲁⲁⲥ ⲉⲥⲛⲁϫⲓ ⲉⲟⲟⲩ ⲛ̅ϭⲓ ⲧⲉ‐ <text:line-break/><text:span text:style-name="T1"> </text:span><text:span text:style-name="T2">(12/11) </text:span> ⲧⲛ̅ⲇⲓⲁⲕⲟⲛⲓⲁ· ⲁⲩⲱ ⲁⲛⲟⲕ ϩⲱ <text:line-break/><text:span text:style-name="T1"> </text:span><text:span text:style-name="T2">(12/12) </text:span> ⲛ̅ϥϫⲓ ⲉⲟⲟⲩ ⲛ̅ϭⲓ ⲡⲁⲣⲁⲛ ϩⲛ̅ ⲛⲓ‐ <text:line-break/><text:span text:style-name="T1"> </text:span><text:span text:style-name="T2">(12/13) </text:span> ⲉⲕⲕⲗⲏⲥⲓⲁ· ⲁⲩⲟⲩⲱϣⲃ̅ ⲛ̅ϭⲓ <text:line-break/><text:span text:style-name="T1"> </text:span><text:span text:style-name="T2">(12/14) </text:span> ⲛ̅ⲙⲁⲑⲏⲧⲏⲥ ⲡⲉϫⲁⲩ ϫⲉ ⲉϩⲉ <text:line-break/><text:span text:style-name="T1"> </text:span><text:span text:style-name="T2">(12/15) </text:span> ϩⲛ̅ ⲟⲩⲙⲉ· ⲡⲁⲓ̈ ⲡⲉⲧⲉⲩⲙ̅ⲡϣⲁ <text:line-break/><text:span text:style-name="T1"> </text:span><text:span text:style-name="T2">(12/16) </text:span> ⲛ̅ⲁⲁϥ· ⲁⲩⲛⲟϫⲟⲩ ⲉϫⲙ̅ ⲡⲕⲁϩ <text:line-break/><text:span text:style-name="T1"> </text:span><text:span text:style-name="T2">(12/17) </text:span> ⲁⲩⲟⲩⲱϣⲧ̅’ ⲙ̅ⲙⲟϥ· ⲁϥⲧⲁϩⲟ‐ <text:line-break/><text:span text:style-name="T1"> </text:span><text:span text:style-name="T2">(12/18) </text:span> ⲟⲩ ⲉⲣⲁⲧⲟⲩ ⲁϥⲃⲱⲕ ⲉⲃⲟⲗ {ϩ̅ⲓ}‐ <text:line-break/><text:span text:style-name="T1"> </text:span><text:span text:style-name="T2">(12/19) </text:span> ⲧⲟⲟⲧⲟⲩ ϩⲛ̅ ⲟⲩⲉⲓⲣⲏⲛⲏ ϩⲁⲙⲏⲛ <text:line-break/><text:span text:style-name="T1"> </text:span><text:span text:style-name="T2">(12/20) </text:span> ⲛⲓⲡⲣⲁⲝⲓⲥ ⲛ̅ⲧⲉ ⲡⲉ‐ <text:line-break/><text:span text:style-name="T1"> </text:span><text:span text:style-name="T2">(12/21) </text:span> ⲧⲣⲟⲥ ⲙⲛ̅ ⲡⲓⲙⲛ̅ⲧ’ⲥⲛⲟ‐ <text:line-break/><text:span text:style-name="T1"> </text:span><text:span text:style-name="T2">(12/22) </text:span> ⲟⲩⲥ ⲛ̅ⲁⲡⲟⲥⲧⲟⲗⲟⲥ </text:p>
      <text:p text:style-name="P1"/>
      <text:p text:style-name="P3">( codex VI ) The Thunder, Perfect Mind</text:p>
      <text:p text:style-name="P2"><text:span text:style-name="T1"> </text:span><text:span text:style-name="T2">(13/1) </text:span> ⲧ̣ⲉⲃⲣⲟⲛⲧⲏ· ⲛⲟⲩⲥ ⲛ̅ⲧⲉⲗⲉⲓⲟⲥ <text:line-break/><text:span text:style-name="T1"> </text:span><text:span text:style-name="T2">(13/2) </text:span> [ⲛ̅]ⲧⲁⲩⲧⲁⲟⲩⲟⲉⲓ ⲁⲛⲟⲕ ⲉⲃⲟⲗ ϩⲛ̅ <text:line-break/><text:span text:style-name="T1"> </text:span><text:span text:style-name="T2">(13/3) </text:span> [ⲧ]ϭ̣ⲟⲙ· ⲁⲩⲱ ⲛ̅ⲧⲁⲓ̈{ⲉ̅ⲓ} ϣⲁ ⲛⲉⲧ’‐ <text:line-break/><text:span text:style-name="T1"> </text:span><text:span text:style-name="T2">(13/4) </text:span> ⲙⲉⲉⲩⲉ ⲉⲣⲟⲓ̈· ⲁⲩⲱ ⲁⲩϭⲓⲛⲉ ⲙ̅‐ <text:line-break/><text:span text:style-name="T1"> </text:span><text:span text:style-name="T2">(13/5) </text:span> ⲙ̣ⲟⲓ̈ ϩⲛ̅ ⲛⲉⲧ’ϣⲓⲛⲉ ⲛ̅ⲥⲱⲉⲓ· ⲉ‐ <text:line-break/><text:span text:style-name="T1"> </text:span><text:span text:style-name="T2">(13/6) </text:span> [ⲛ]ⲁ̣ⲩ ⲉⲣⲟⲉⲓ ⲛⲉⲧ’ⲙⲉⲉⲩⲉ ⲉⲣⲟⲓ̈· <text:line-break/><text:span text:style-name="T1"> </text:span><text:span text:style-name="T2">(13/7) </text:span> ⲁⲩⲱ ⲛ̅ⲣⲉϥⲥⲱⲧⲙ̅ ⲥⲱⲧⲙ̅ ⲉⲣⲟⲓ̈· <text:line-break/><text:span text:style-name="T1"> </text:span><text:span text:style-name="T2">(13/8) </text:span> ⲛⲉⲧ’ϭⲟϣⲧ̅’ ⲉⲃⲟⲗ ϩⲏⲧ’ ϣⲟⲡⲧ̅’ <text:line-break/><text:span text:style-name="T1"> </text:span><text:span text:style-name="T2">(13/9) </text:span> ⲉⲣⲱⲧⲛ̅· ⲁⲩⲱ ⲙ̅ⲡⲣ̅ⲡⲱⲧ’ ⲛ̅ⲥⲱⲓ̈ <text:line-break/><text:span text:style-name="T1"> </text:span><text:span text:style-name="T2">(13/10) </text:span> ⲙ̅ⲡⲉⲙⲧⲟ ⲛ̅ⲛⲉⲧⲛ̅ⲃⲁⲗ ⲉⲃⲟⲗ <text:line-break/><text:span text:style-name="T1"> </text:span><text:span text:style-name="T2">(13/11) </text:span> ⲁⲩⲱ ⲙ̅ⲡⲣ̅ⲧⲣⲉ ⲡⲉⲧⲛ̅ϩⲣⲟⲟⲩ ⲙⲉⲥ‐ <text:line-break/><text:span text:style-name="T1"> </text:span><text:span text:style-name="T2">(13/12) </text:span> ⲧⲱⲉⲓ· ⲁⲩⲱ ⲡⲉⲧⲛ̅ⲥⲱⲧⲙ̅· ⲙ̅‐ <text:line-break/><text:span text:style-name="T1"> </text:span><text:span text:style-name="T2">(13/13) </text:span> ⲡⲣ̅ⲣ̅ ⲁⲧ’ⲥⲁⲩⲛⲉ ⲙ̅ⲙⲟⲉⲓ ⲕⲁⲧⲁ <text:line-break/><text:span text:style-name="T1"> </text:span><text:span text:style-name="T2">(13/14) </text:span> ⲙⲁ· ⲏ%0 ⲕⲁⲧⲁ ⲛ̅ⲕⲉⲟⲩⲁⲉⲓϣ· ⲁⲣⲉϩ <text:line-break/><text:span text:style-name="T1"> </text:span><text:span text:style-name="T2">(13/15) </text:span> ⲙ̅ⲡⲣ̅ⲣ̅ ⲁⲧ’ⲥⲟⲟⲩⲛ ⲙ̅ⲙⲟⲉⲓ· ⲁⲛⲟⲕ <text:line-break/><text:span text:style-name="T1"> </text:span><text:span text:style-name="T2">(13/16) </text:span> ⲅⲁⲣ ⲧⲉ ⲧ’ϣⲟⲣⲡ̅’ ⲁⲩⲱ ⲑⲁⲏ· ⲁⲛⲟⲕ <text:line-break/><text:span text:style-name="T1"> </text:span><text:span text:style-name="T2">(13/17) </text:span> ⲧⲉ ⲧⲉ〈ⲧ〉ⲧⲁⲉⲓⲁⲉⲓⲧ’ ⲁⲩⲱ ⲧⲉⲧ’ϣⲏⲥ· <text:line-break/><text:span text:style-name="T1"> </text:span><text:span text:style-name="T2">(13/18) </text:span> ⲁⲛⲟⲕ ⲧⲉ ⲧⲡⲟⲣⲛⲏ ⲁⲩⲱ ⲧⲥⲉⲙⲛ̣ⲏ̣· <text:line-break/><text:span text:style-name="T1"> </text:span><text:span text:style-name="T2">(13/19) </text:span> ⲁⲛⲟⲕ ⲧⲉ ⲧⲉⲥ{ϩ̅ⲓ}ⲙⲉ ⲁⲩⲱ ⲧⲡⲁⲣ‐ <text:line-break/><text:span text:style-name="T1"> </text:span><text:span text:style-name="T2">(13/20) </text:span> ⲑⲉⲛⲟⲥ· ⲁⲛⲟⲕ 〈ⲧ〉ⲉⲧ’ⲙ〈ⲁⲁ〉ⲩ{ⲉ} <text:line-break/><text:span text:style-name="T1"> </text:span><text:span text:style-name="T2">(13/21) </text:span> ⲁⲩⲱ ⲧϣⲉⲉⲣⲉ· ⲁⲛⲟⲕ ⲙ̅ⲙⲉⲗⲟⲥ <text:line-break/><text:span text:style-name="T1"> </text:span><text:span text:style-name="T2">(13/22) </text:span> ⲛ̅ⲧⲉ ⲧⲁⲙⲁⲁⲩ· ⲁⲛⲟⲕ ⲧⲉ ⲧⲁϭⲣⲏⲛ· <text:line-break/><text:span text:style-name="T1"> </text:span><text:span text:style-name="T2">(13/23) </text:span> ⲁⲩⲱ ⲛⲁϣⲉ ⲛⲉⲥϣⲏⲣⲉ· ⲁⲛⲟⲕ <text:line-break/><text:span text:style-name="T1"> </text:span><text:span text:style-name="T2">(13/24) </text:span> ⲧⲉ ⲧⲉⲧⲛⲁϣⲉ ⲡⲉⲥⲅⲁⲙⲟⲥ ⲁⲩⲱ <text:line-break/><text:span text:style-name="T1"> </text:span><text:span text:style-name="T2">(13/25) </text:span> ⲙ̅ⲡⲓϫⲉⲓ ϩⲁⲓ̈· ⲁⲛⲟⲕ ⲧⲉ ⲧⲙⲉⲥⲓⲱ <text:line-break/><text:span text:style-name="T1"> </text:span><text:span text:style-name="T2">(13/26) </text:span> ⲁⲩⲱ ⲧⲉⲧⲉ ⲙⲁⲥⲙⲓⲥⲉ· ⲁⲛⲟⲕ <text:line-break/><text:span text:style-name="T1"> </text:span><text:span text:style-name="T2">(13/27) </text:span> ⲡⲉ ⲡⲥⲟⲗⲥⲗ̅ ⲛ̅ⲛⲁⲛⲁⲁⲕⲉ· ⲁⲛⲟⲕ <text:line-break/><text:span text:style-name="T1"> </text:span><text:span text:style-name="T2">(13/28) </text:span> ⲧⲉ ⲧϣⲉⲗⲉⲉⲧ’· ⲁⲩⲱ ⲡⲣⲙ̅ϣⲉⲗⲉ‐ <text:line-break/><text:span text:style-name="T1"> </text:span><text:span text:style-name="T2">(13/29) </text:span> ⲉⲧ’· ⲁⲩⲱ ⲡⲁϩⲟⲟⲩⲧ’ ⲡⲉⲛⲧⲁϥ‐ <text:line-break/><text:span text:style-name="T1"> </text:span><text:span text:style-name="T2">(13/30) </text:span> ϫⲡⲟⲉⲓ· ⲁⲛⲟⲕ ⲧⲉ ⲧⲙⲁⲁⲩ ⲛ̅ⲧⲉ <text:line-break/><text:span text:style-name="T1"> </text:span><text:span text:style-name="T2">(13/31) </text:span> ⲡⲁⲉⲓⲱⲧ’· ⲁⲩⲱ ⲧⲥⲱⲛⲉ ⲙ̅ⲡⲁ‐ <text:line-break/><text:span text:style-name="T1"> </text:span><text:span text:style-name="T2">(13/32) </text:span> ϩⲟⲟⲩⲧ’· ⲁⲩⲱ ⲛ̅ⲧⲟϥ ⲡⲉ ⲡⲁϫⲡⲟ· <text:line-break/><text:span text:style-name="T1"> </text:span><text:span text:style-name="T2">(13/33) </text:span> ⲁⲛⲟⲕ ⲧⲉ ⲧ’ϭⲁⲟⲩⲟⲟⲛⲉ ⲙ̅ⲡⲉⲛ‐ <text:line-break/><text:span text:style-name="T1"> </text:span><text:span text:style-name="T2">(13/34) </text:span> ⲧⲁϥⲥⲃ̅ⲧⲱⲧ’· ⲁⲛⲟⲕ ⲧⲉ ⲧ’ϫⲟⲉⲓⲥ <text:line-break/><text:span text:style-name="T1"> </text:span><text:span text:style-name="T2">(14/1) </text:span> ⲙ̅ⲡⲁϫⲡⲟ· ⲛ̅ⲧⲟϥ ⲇⲉ ⲡⲉⲛⲧⲁϥϫ[ⲡⲟⲓ̈] <text:line-break/><text:span text:style-name="T1"> </text:span><text:span text:style-name="T2">(14/2) </text:span> ϩⲁⲑⲏ ⲙ̅ⲡⲉⲟⲩⲟⲉⲓϣ ϩⲛ̅ ⲟⲩϩⲟ̣[ⲩ]‐ <text:line-break/><text:span text:style-name="T1"> </text:span><text:span text:style-name="T2">(14/3) </text:span> ⲙⲓⲥⲉ· ⲁⲩⲱ ⲛ̅ⲧⲟϥ ⲡⲉ ⲡⲁϫⲡⲟ ϩ[ⲙ̅] <text:line-break/><text:span text:style-name="T1"> </text:span><text:span text:style-name="T2">(14/4) </text:span> ⲡⲉⲟⲩⲟⲉⲓϣ· ⲁⲩⲱ ⲧⲁⲇⲩⲛⲁⲙⲓⲥ ⲟ[ⲩ]‐ <text:line-break/><text:span text:style-name="T1"> </text:span><text:span text:style-name="T2">(14/5) </text:span> ⲉ̣ⲃⲟⲗ ⲛ̅ϩⲏⲧϥ̅ ⲧⲉ· ⲁⲛⲟⲕ ⲡϭⲉⲣⲱ̣[ⲃ] <text:line-break/><text:span text:style-name="T1"> </text:span><text:span text:style-name="T2">(14/6) </text:span> ⲛ̅ⲧⲉϥϭⲟⲙ ϩⲛ̅ ⲧⲉϥⲙⲛ̅ⲧ’ϣⲏⲙ [ⲁⲩⲱ] <text:line-break/><text:span text:style-name="T1"> </text:span><text:span text:style-name="T2">(14/7) </text:span> ⲛ̅ⲧⲟϥ ⲡⲉ ⲧ’ⲕⲉⲗⲉⲉⲗⲉ ⲛ̅ⲧⲁⲙⲛ̅ⲧ’̣‐ <text:line-break/><text:span text:style-name="T1"> </text:span><text:span text:style-name="T2">(14/8) </text:span> ϩⲗ̅ⲗⲱ· ⲁⲩⲱ ⲡⲉⲧϥ̅ⲟⲩⲟϣϥ̅ ϣⲁϥ‐ <text:line-break/><text:span text:style-name="T1"> </text:span><text:span text:style-name="T2">(14/9) </text:span> ϣⲱⲡⲉ ⲙ̅ⲙⲟⲉⲓ· ⲁⲛⲟⲕ ⲡⲉ ⲡⲕⲁⲣⲱϥ <text:line-break/><text:span text:style-name="T1"> </text:span><text:span text:style-name="T2">(14/10) </text:span> ⲉⲧⲉ ⲙⲁⲩϣⲧⲁϩⲟϥ· ⲁⲩⲱ ⲧⲉⲡⲓⲛⲟⲓ‐ <text:line-break/><text:span text:style-name="T1"> </text:span><text:span text:style-name="T2">(14/11) </text:span> ⲁ ⲉⲧⲉ ⲛⲁϣⲉ ⲡⲉⲥⲣ̅ ⲡⲙⲉⲉⲩⲉ· <text:line-break/><text:span text:style-name="T1"> </text:span><text:span text:style-name="T2">(14/12) </text:span> ⲁⲛⲟⲕ ⲧⲉ ⲧⲉⲥⲙⲏ ⲉⲧⲉ ⲛⲁϣⲉ ⲡⲉⲥ‐ <text:line-break/><text:span text:style-name="T1"> </text:span><text:span text:style-name="T2">(14/13) </text:span> ϩⲣⲟⲟⲩ· ⲁⲩⲱ ⲡⲗⲟⲅⲟⲥ ⲉⲧⲉ ⲛⲁϣⲉ <text:line-break/><text:soft-page-break/><text:span text:style-name="T1"> </text:span><text:span text:style-name="T2">(14/14) </text:span> ⲡⲉϥⲉⲓⲛⲉ· ⲁⲛⲟⲕ ⲡⲉ ⲡϣⲁϫⲉ ⲙ̅‐ <text:line-break/><text:span text:style-name="T1"> </text:span><text:span text:style-name="T2">(14/15) </text:span> ⲡⲁⲣⲁⲛ· ⲉⲧⲃⲉ ⲟⲩ ⲛⲉⲧ’ⲙⲟⲥⲧⲉ ⲙ̅‐ <text:line-break/><text:span text:style-name="T1"> </text:span><text:span text:style-name="T2">(14/16) </text:span> ⲙⲟⲉⲓ ⲧⲉⲧⲛ̅ⲙⲉ ⲙ̅ⲙⲟⲉⲓ· ⲁⲩⲱ <text:line-break/><text:span text:style-name="T1"> </text:span><text:span text:style-name="T2">(14/17) </text:span> ⲧⲉⲧⲛ̅ⲙⲟⲥⲧⲉ ⲛ̅ⲛⲉⲧⲙⲉ ⲙ̅ⲙⲟⲉⲓ· <text:line-break/><text:span text:style-name="T1"> </text:span><text:span text:style-name="T2">(14/18) </text:span> ⲛⲉⲧⲣ̅ⲁⲣⲛⲁ ⲙ̅ⲙⲟⲉⲓ ⲉⲣⲓϩⲟⲙⲟⲗⲟⲅⲉⲓ <text:line-break/><text:span text:style-name="T1"> </text:span><text:span text:style-name="T2">(14/19) </text:span> ⲙ̅ⲙⲟⲉⲓ· ⲁⲩⲱ ⲛⲉⲧⲣ̅ϩⲟⲙⲟⲗⲟⲅⲉⲓ <text:line-break/><text:span text:style-name="T1"> </text:span><text:span text:style-name="T2">(14/20) </text:span> ⲙ̅ⲙⲟⲉⲓ ⲉⲣⲓⲁⲣⲛⲁ ⲙ̅ⲙⲟⲉⲓ· ⲛⲉⲧ’ϫⲉ <text:line-break/><text:span text:style-name="T1"> </text:span><text:span text:style-name="T2">(14/21) </text:span> ⲙⲉ ⲉⲣⲟⲓ̈ ϫⲓ ϭⲟⲗ ⲉⲣⲟⲉⲓ· ⲁⲩⲱ ⲛⲉ‐ <text:line-break/><text:span text:style-name="T1"> </text:span><text:span text:style-name="T2">(14/22) </text:span> ⲧⲁⲩϫⲉ ϭⲟⲗ ⲉⲣⲟⲉⲓ ϫⲉ ⲧⲙⲉ ⲉⲣⲟⲉⲓ· <text:line-break/><text:span text:style-name="T1"> </text:span><text:span text:style-name="T2">(14/23) </text:span> ⲛⲉⲧ’ⲥⲟⲟⲩⲛ ⲙ̅ⲙⲟⲉⲓ ⲉⲣⲓⲁⲧ’ⲥⲟ‐ <text:line-break/><text:span text:style-name="T1"> </text:span><text:span text:style-name="T2">(14/24) </text:span> ⲟⲩⲛ ⲙ̅ⲙⲟⲉⲓ· ⲁⲩⲱ ⲛⲉⲧⲉ ⲙ̅ⲡⲟⲩ‐ <text:line-break/><text:span text:style-name="T1"> </text:span><text:span text:style-name="T2">(14/25) </text:span> ⲥⲟⲩⲱⲛⲧ̅’ ⲙⲁⲣⲟⲩⲥⲟⲩⲱⲛⲧ̅’· <text:line-break/><text:span text:style-name="T1"> </text:span><text:span text:style-name="T2">(14/26) </text:span> ⲁⲛⲟⲕ ⲅⲁⲣ ⲡⲉ ⲡⲥⲟⲟⲩⲛ ⲁⲩⲱ <text:line-break/><text:span text:style-name="T1"> </text:span><text:span text:style-name="T2">(14/27) </text:span> ⲧⲙⲛ̅ⲧ’ⲁⲧ’ⲥⲟⲟⲩⲛ· ⲁⲛⲟⲕ ⲡⲉ <text:line-break/><text:span text:style-name="T1"> </text:span><text:span text:style-name="T2">(14/28) </text:span> ⲡϣⲓⲡⲉ ⲁⲩⲱ ⲧⲡⲁⲣϩⲏⲥⲓⲁ· <text:line-break/><text:span text:style-name="T1"> </text:span><text:span text:style-name="T2">(14/29) </text:span> ⲁⲛⲟⲕ ⲟⲩⲁⲧϣⲓⲡⲉ· ⲁⲛⲟⲕ ⲟⲩ‐ <text:line-break/><text:span text:style-name="T1"> </text:span><text:span text:style-name="T2">(14/30) </text:span> ϫⲡⲓⲏⲧ’· ⲁⲛⲟⲕ ⲟⲩⲛⲁϣⲧⲉ· ⲁⲩⲱ <text:line-break/><text:span text:style-name="T1"> </text:span><text:span text:style-name="T2">(14/31) </text:span> ⲁⲛⲟⲕ ⲟⲩϩⲣ̅ⲧⲉ· ⲁⲛⲟⲕ ⲡⲉ ⲡ̅ⲡⲟ‐ <text:line-break/><text:span text:style-name="T1"> </text:span><text:span text:style-name="T2">(14/32) </text:span> ⲗⲉⲙⲟⲥ ⲁⲩⲱ ϯⲣⲏⲛⲏ· ϯ ϩⲧⲏ‐ <text:line-break/><text:span text:style-name="T1"> </text:span><text:span text:style-name="T2">(14/33) </text:span> ⲧⲛ̅ ⲉⲣⲟⲉⲓ ⲁⲛⲟⲕ ⲧⲉⲧ’ϭⲁⲉⲓⲏⲟⲩ <text:line-break/><text:span text:style-name="T1"> </text:span><text:span text:style-name="T2">(14/34) </text:span> ⲁⲩⲱ ⲧⲛⲟϭ· ϯ ϩⲧⲏⲧⲛ̅ ⲉⲧⲁⲙⲛ̅ⲧ’‐ <text:line-break/><text:span text:style-name="T1"> </text:span><text:span text:style-name="T2">(15/1) </text:span> [ϩⲏ]ⲕⲉ· ⲁⲩⲱ ⲧⲁⲙⲛ̅ⲧⲣⲙ̅ⲙⲁⲟ· <text:line-break/><text:span text:style-name="T1"> </text:span><text:span text:style-name="T2">(15/2) </text:span> [ⲙ̅]ⲡⲣ̅ϫⲓⲥⲉ ⲛ̅ϩⲏⲧ’ ⲉⲣⲟ{ⲉ̅ⲓ} ⲉⲉⲓ‐ <text:line-break/><text:span text:style-name="T1"> </text:span><text:span text:style-name="T2">(15/3) </text:span> ⲛ̣ⲏϫ ⲉⲃⲟⲗ {ϩ̅ⲓ}ϫⲙ̅ ⲡⲕⲁϩ· ⲁ[ⲩⲱ] <text:line-break/><text:span text:style-name="T1"> </text:span><text:span text:style-name="T2">(15/4) </text:span> ⲧⲉⲧⲛⲁϭⲓⲛⲉ ⲙ̅ⲙⲟⲉⲓ ϩⲛ̅ ⲛ[ⲉ]‐ <text:line-break/><text:span text:style-name="T1"> </text:span><text:span text:style-name="T2">(15/5) </text:span> [ⲧ]ⲛ̅ⲛⲏⲟⲩ· ⲟⲩⲧⲉ ⲙ̅ⲡⲣ̅ⲛⲁⲩ <text:line-break/><text:span text:style-name="T1"> </text:span><text:span text:style-name="T2">(15/6) </text:span> [ⲉⲣ]ⲟ̣ⲉⲓ {ϩ̅ⲓ} ⲧⲕⲟⲡⲣⲓⲁ ⲛ̅ⲧⲉⲧⲛ̅ⲃⲱⲕ <text:line-break/><text:span text:style-name="T1"> </text:span><text:span text:style-name="T2">(15/7) </text:span> [ⲛ̅]ⲧ̣ⲉⲧⲛ̅ⲕⲁⲁⲧ’ ⲉⲉⲓⲛⲏϫ ⲉⲃⲟⲗ· <text:line-break/><text:span text:style-name="T1"> </text:span><text:span text:style-name="T2">(15/8) </text:span> ⲁⲩⲱ ⲧⲉⲧⲛⲁϭⲓⲛⲉ ⲙ̅ⲙⲟⲉⲓ ϩⲛ̅ <text:line-break/><text:span text:style-name="T1"> </text:span><text:span text:style-name="T2">(15/9) </text:span> ⲙ̅ⲙⲛ̅ⲧⲣ̅ⲣⲁⲉⲓ· ⲟⲩⲇⲉ ⲙ̅ⲡⲣ̅ⲛⲁⲩ <text:line-break/><text:span text:style-name="T1"> </text:span><text:span text:style-name="T2">(15/10) </text:span> ⲉⲣⲟⲉⲓ ⲉⲉⲓⲛⲏϫ ⲉⲃⲟⲗ ϩⲛ̅ ⲛⲉⲧ’ϭⲁ‐ <text:line-break/><text:span text:style-name="T1"> </text:span><text:span text:style-name="T2">(15/11) </text:span> ⲉⲓⲏⲟⲩ· ⲁⲩⲱ ϩⲛ̅ ⲛⲉⲗⲁⲭⲓⲥⲧⲟⲥ 〈ⲛ̅〉‐ <text:line-break/><text:span text:style-name="T1"> </text:span><text:span text:style-name="T2">(15/12) </text:span> ⲧⲟⲡⲟⲥ ⲛ̅ⲧⲉⲧⲛ̅ⲥⲱⲃⲉ ⲛ̅ⲥⲱⲉⲓ· <text:line-break/><text:span text:style-name="T1"> </text:span><text:span text:style-name="T2">(15/13) </text:span> ⲟⲩⲇⲉ ⲙ̅ⲡⲣ̅ⲛⲟϫⲧ̅’ ⲉϩⲣⲁⲓ̈ ⲉⲛⲉⲧ’‐ <text:line-break/><text:span text:style-name="T1"> </text:span><text:span text:style-name="T2">(15/14) </text:span> ϣⲁⲁⲧ’ ϩⲛ̅ ⲟⲩⲙⲛ̅ⲧ’ⲁⲩⲥⲧⲏⲣⲟⲥ· <text:line-break/><text:span text:style-name="T1"> </text:span><text:span text:style-name="T2">(15/15) </text:span> ⲁⲛⲟⲕ ⲇⲉ ⲁⲛⲟⲕ ⲟⲩϣⲁⲛ ϩⲧⲏⲥ· <text:line-break/><text:span text:style-name="T1"> </text:span><text:span text:style-name="T2">(15/16) </text:span> ⲁⲩⲱ ⲁⲛⲟⲕ ⲟⲩⲁ{ϩ̅ⲓ}ⲏⲧ’· ⲁⲣⲏϩ <text:line-break/><text:span text:style-name="T1"> </text:span><text:span text:style-name="T2">(15/17) </text:span> ⲙ̅ⲡⲣ̅ⲙⲉⲥⲧⲉ ⲧⲁⲙⲛ̅ⲧ’ⲥⲧⲙⲏⲧ’· <text:line-break/><text:span text:style-name="T1"> </text:span><text:span text:style-name="T2">(15/18) </text:span> ⲁⲩⲱ ⲧⲁⲉⲅ’ⲕⲣⲁⲧⲉⲓⲁ ⲛ̅ⲧⲉⲧⲛ̅‐ <text:line-break/><text:span text:style-name="T1"> </text:span><text:span text:style-name="T2">(15/19) </text:span> ⲙⲉⲣⲓⲧⲥ̅ ϩⲛ̅ ⲧⲁⲙⲛ̅ⲧ’ϭⲱⲃ· ⲙ̅ⲡⲣ̅‐ <text:line-break/><text:span text:style-name="T1"> </text:span><text:span text:style-name="T2">(15/20) </text:span> ⲃϣ̅ ⲧⲏⲛⲉ ⲉⲣⲟⲉⲓ· ⲁⲩⲱ ⲛ̅ⲧⲉ‐ <text:line-break/><text:span text:style-name="T1"> </text:span><text:span text:style-name="T2">(15/21) </text:span> ⲧⲛ̅ⲧⲙ̅ⲣ̅ ϩⲟⲧⲉ ϩⲏⲧⲥ̅ ⲛ̅ⲧⲁϭⲟⲙ· <text:line-break/><text:span text:style-name="T1"> </text:span><text:span text:style-name="T2">(15/22) </text:span> ⲉⲧⲃⲉ ⲟⲩ ⲅⲁⲣ ⲧⲉⲧⲛ̅ⲣ̅ⲕⲁⲧⲁ‐ <text:line-break/><text:span text:style-name="T1"> </text:span><text:span text:style-name="T2">(15/23) </text:span> ⲫⲣⲟⲛⲓ ⲛ̅ⲧⲁϩⲣ̅ⲧⲉ· ⲁⲩⲱ ⲧⲉ‐ <text:line-break/><text:span text:style-name="T1"> </text:span><text:span text:style-name="T2">(15/24) </text:span> ⲧⲛ̅ⲥⲁϩⲟⲩ ⲙ̅ⲡⲁϣⲟⲩϣⲟⲩ· <text:line-break/><text:span text:style-name="T1"> </text:span><text:span text:style-name="T2">(15/25) </text:span> ⲁⲛⲟⲕ ⲇⲉ ⲧⲉⲧ’ϣⲟⲟⲡ’ ϩⲛ̅ ⲛ̅‐ <text:line-break/><text:span text:style-name="T1"> </text:span><text:span text:style-name="T2">(15/26) </text:span> ⲫⲟⲃⲟⲥ ⲧⲏⲣⲟⲩ· ⲁⲩⲱ ⲡⲛ̅ϣⲁⲧ’ <text:line-break/><text:soft-page-break/><text:span text:style-name="T1"> </text:span><text:span text:style-name="T2">(15/27) </text:span> ϩⲛ̅ ⲟⲩⲥⲧⲱⲧ’· ⲁⲛⲟⲕ ⲧⲉ ⲧⲉⲧ’‐ <text:line-break/><text:span text:style-name="T1"> </text:span><text:span text:style-name="T2">(15/28) </text:span> ϭⲟⲟⲃ· ⲁⲩⲱ ⲉⲉⲓⲟⲩⲁϫ ϩⲛ̅ ⲟⲩ‐ <text:line-break/><text:span text:style-name="T1"> </text:span><text:span text:style-name="T2">(15/29) </text:span> ϩⲏⲇⲟⲛⲏ ⲛ̅ⲧⲟⲡⲟⲥ· ⲁⲛⲟⲕ ⲟⲩ‐ <text:line-break/><text:span text:style-name="T1"> </text:span><text:span text:style-name="T2">(15/30) </text:span> ⲁⲑⲏⲧ’ ⲁⲩⲱ ⲁⲛⲟⲕ ⲟⲩⲥⲁⲃⲏ· <text:line-break/><text:span text:style-name="T1"> </text:span><text:span text:style-name="T2">(15/31) </text:span> ⲉⲧⲃⲉ ⲟⲩ ⲁⲧⲉⲧⲛ̅ⲙⲉⲥⲧⲱⲉⲓ <text:line-break/><text:span text:style-name="T1"> </text:span><text:span text:style-name="T2">(15/32) </text:span> ϩⲛ̅ ⲛⲉⲧⲛ̅ϣⲟϫⲛⲉ· ϫⲉ ϯⲛⲁⲕⲁ‐ <text:line-break/><text:span text:style-name="T1"> </text:span><text:span text:style-name="T2">(15/33) </text:span> ⲣⲱⲉⲓ ⲁⲛⲟⲕ ϩⲛ̅ ⲛⲉⲧ’ⲕⲁⲣⲱⲟⲩ· <text:line-break/><text:span text:style-name="T1"> </text:span><text:span text:style-name="T2">(15/34) </text:span> ⲁⲩⲱ ϯⲛⲁⲟⲩⲱⲛϩ̅ ⲉⲃⲟⲗ ⲛ̅ⲧⲁ‐ <text:line-break/><text:span text:style-name="T1"> </text:span><text:span text:style-name="T2">(15/35) </text:span> 4ϣⲁϫⲉ <text:line-break/><text:span text:style-name="T1"> </text:span><text:span text:style-name="T2">(16/1) </text:span> ⲉⲧⲃⲉ ⲟⲩ ϭⲉ ⲁⲧⲉⲧⲛ̅ⲙⲉⲥⲧⲱⲉⲓ ⲛ̅ϩ[ⲉⲗ] <text:line-break/><text:span text:style-name="T1"> </text:span><text:span text:style-name="T2">(16/2) </text:span> ⲗⲏⲛ· ϫⲉ ⲁⲛⲟⲕ ⲟⲩⲃⲁⲣⲃⲁⲣⲟⲥ ϩⲛ̣̅ [ⲛ̅]‐ <text:line-break/><text:span text:style-name="T1"> </text:span><text:span text:style-name="T2">(16/3) </text:span> [ⲃ]ⲁⲣⲃⲁⲣⲟⲥ· ⲁⲛⲟⲕ ⲅⲁⲣ ⲧⲉ ⲧⲥⲟⲫ[ⲓⲁ] <text:line-break/><text:span text:style-name="T1"> </text:span><text:span text:style-name="T2">(16/4) </text:span> [ⲛ̅ⲛ̅ϩ]ⲉⲗⲗⲏⲛ· ⲁⲩⲱ ⲧⲅⲛⲱⲥⲓⲥ ⲛ̣̅[ⲛ̅]‐ <text:line-break/><text:span text:style-name="T1"> </text:span><text:span text:style-name="T2">(16/5) </text:span> ⲃ̣[ⲁ]ⲣ̣[ⲃ]ⲁⲣⲟⲥ· ⲁⲛⲟⲕ ⲡⲉ ⲫⲁⲡ’ ⲛ̣̅[ⲛ̅]‐ <text:line-break/><text:span text:style-name="T1"> </text:span><text:span text:style-name="T2">(16/6) </text:span> ϩⲉⲗⲗⲏⲛ ⲙⲛ̅ ⲛ̅ⲃⲁⲣⲃⲁⲣⲟⲥ· ⲁ̣[ⲛⲟⲕ] <text:line-break/><text:span text:style-name="T1"> </text:span><text:span text:style-name="T2">(16/7) </text:span> ⲡⲉⲧ’ⲛⲁϣⲉ ⲡⲉⲥⲉⲓⲛⲉ ϩⲛ̅ ⲕⲏⲙⲉ <text:line-break/><text:span text:style-name="T1"> </text:span><text:span text:style-name="T2">(16/8) </text:span> ⲁⲩⲱ ⲧⲉⲧⲉ ⲙⲛ̅ⲧⲉⲥ ⲉⲓⲛⲉ ϩⲛ̅ ⲛ̅ⲃⲁⲣ‐ <text:line-break/><text:span text:style-name="T1"> </text:span><text:span text:style-name="T2">(16/9) </text:span> ⲃⲁⲣⲟⲥ· ⲁⲛⲟⲕ ⲧⲉⲛⲧⲁⲩⲙⲉⲥⲧⲱⲥ̣ <text:line-break/><text:span text:style-name="T1"> </text:span><text:span text:style-name="T2">(16/10) </text:span> ϩⲛ̅ ⲙⲁ ⲛⲓⲙ· ⲁⲩⲱ ⲧⲉⲛⲧⲁⲩⲙⲉⲣⲓⲧⲥ̅ <text:line-break/><text:span text:style-name="T1"> </text:span><text:span text:style-name="T2">(16/11) </text:span> ϩⲙ̅ ⲙⲁ ⲛⲓⲙ· ⲁⲛⲟⲕ ⲧⲉⲧⲉ ϣⲁⲩⲙⲟⲩ‐ <text:line-break/><text:span text:style-name="T1"> </text:span><text:span text:style-name="T2">(16/12) </text:span> ⲧⲉ ⲉⲣⲟⲥ ϫⲉ ⲡⲱⲛϩ̅· ⲁⲩⲱ ⲁⲧⲉⲧⲛ̅‐ <text:line-break/><text:span text:style-name="T1"> </text:span><text:span text:style-name="T2">(16/13) </text:span> ⲙⲟⲩⲧⲉ ϫⲉ ⲡⲙⲟⲩ· ⲁⲛⲟⲕ ⲧⲉⲧⲉ‐ <text:line-break/><text:span text:style-name="T1"> </text:span><text:span text:style-name="T2">(16/14) </text:span> ϣⲁⲩⲙⲟⲩⲧⲉ ⲉⲣⲟⲥ ϫⲉ ⲡⲛⲟⲙⲟⲥ <text:line-break/><text:span text:style-name="T1"> </text:span><text:span text:style-name="T2">(16/15) </text:span> ⲁⲩⲱ ⲁⲧⲉⲧⲛ̅ⲙⲟⲩⲧⲉ ϫⲉ ⲧⲁⲛⲟⲙⲓⲁ· <text:line-break/><text:span text:style-name="T1"> </text:span><text:span text:style-name="T2">(16/16) </text:span> ⲁⲛⲟⲕ ⲧⲉⲛⲧⲁⲧⲉⲧⲛ̅ⲡⲱⲧ’ ⲛ̅ⲥⲱⲉⲓ· <text:line-break/><text:span text:style-name="T1"> </text:span><text:span text:style-name="T2">(16/17) </text:span> ⲁⲩⲱ ⲁⲛⲟⲕ ⲧⲉⲛⲧⲁⲧⲉⲧⲛ̅ⲁⲙⲁϩⲧⲉ <text:line-break/><text:span text:style-name="T1"> </text:span><text:span text:style-name="T2">(16/18) </text:span> ⲙ̅ⲙⲟⲉⲓ· ⲁⲛⲟⲕ ⲧⲉ ⲧⲉⲛⲧⲁⲧⲉⲧⲛ̅ϫⲟ‐ <text:line-break/><text:span text:style-name="T1"> </text:span><text:span text:style-name="T2">(16/19) </text:span> ⲟⲣⲉⲧ’ ⲉⲃⲟⲗ· ⲁⲩⲱ ⲁⲧⲉⲧⲛ̅ⲥⲟⲟⲩ‐ <text:line-break/><text:span text:style-name="T1"> </text:span><text:span text:style-name="T2">(16/20) </text:span> ϩⲧ̅’ ⲉϩⲟⲩⲛ· ⲁⲛⲟⲕ ⲧⲉⲛⲧⲁⲧⲉⲧⲛ̅‐ <text:line-break/><text:span text:style-name="T1"> </text:span><text:span text:style-name="T2">(16/21) </text:span> ϣⲓⲡⲉ ϩⲏⲧⲥ̅· ⲁⲩⲱ ⲁⲧⲉⲧⲛ̅ⲣ̅ ⲁⲧϣⲓ‐ <text:line-break/><text:span text:style-name="T1"> </text:span><text:span text:style-name="T2">(16/22) </text:span> ⲡⲉ ⲛⲏⲉⲓ· ⲁⲛⲟⲕ ⲧⲉⲧⲉ ⲙⲁⲥⲣ̅ ϣⲁ <text:line-break/><text:span text:style-name="T1"> </text:span><text:span text:style-name="T2">(16/23) </text:span> ⲁⲩⲱ ⲁⲛⲟⲕ ⲧⲉⲧⲉ ⲛⲁϣⲉ ⲛⲉⲥϣⲁ· <text:line-break/><text:span text:style-name="T1"> </text:span><text:span text:style-name="T2">(16/24) </text:span> ⲁⲛⲟⲕ ⲁⲛⲟⲕ ⲟⲩⲁⲧⲛⲟⲩⲧⲉ· ⲁⲩⲱ <text:line-break/><text:span text:style-name="T1"> </text:span><text:span text:style-name="T2">(16/25) </text:span> ⲁⲛⲟⲕ ⲧⲉⲧⲉ ⲛⲁϣⲉ ⲡⲉⲥⲛⲟⲩⲧⲉ· <text:line-break/><text:span text:style-name="T1"> </text:span><text:span text:style-name="T2">(16/26) </text:span> ⲁⲛⲟⲕ ⲡⲉⲛⲧⲁⲧⲉⲧⲛ̅ⲙⲉⲉⲩⲉ ⲉⲣⲟⲓ̈ <text:line-break/><text:span text:style-name="T1"> </text:span><text:span text:style-name="T2">(16/27) </text:span> ⲁⲩⲱ ⲁⲧⲉⲧⲛ̅ϣⲟⲥⲧ̅’· ⲁⲛⲟⲕ ⲟⲩ‐ <text:line-break/><text:span text:style-name="T1"> </text:span><text:span text:style-name="T2">(16/28) </text:span> ⲁⲧ’ⲥⲃⲱ· ⲁⲩⲱ ⲉⲩϫⲓ ⲥⲃⲱ ⲉⲃⲟⲗ <text:line-break/><text:span text:style-name="T1"> </text:span><text:span text:style-name="T2">(16/29) </text:span> {ϩ̅ⲓ}ⲧⲟⲟⲧ’· ⲁⲛⲟⲕ ⲧⲉ ⲧⲉⲛⲧⲁⲧⲉⲧⲛ̅‐ <text:line-break/><text:span text:style-name="T1"> </text:span><text:span text:style-name="T2">(16/30) </text:span> ⲕⲁⲧⲁⲫⲣⲟⲛⲉⲓ ⲙ̅ⲙⲟⲉⲓ· ⲁⲩⲱ ⲧⲉ‐ <text:line-break/><text:span text:style-name="T1"> </text:span><text:span text:style-name="T2">(16/31) </text:span> ⲧⲛ̅ⲙⲉⲉⲩⲉ ⲉⲣⲟⲉⲓ· ⲁⲛⲟⲕ ⲡⲉⲛ‐ <text:line-break/><text:span text:style-name="T1"> </text:span><text:span text:style-name="T2">(16/32) </text:span> ⲧⲁⲧⲉⲧⲛ̅ϩⲱⲡ’ ⲉⲣⲟⲉⲓ· ⲁⲩⲱ ⲧⲉ‐ <text:line-break/><text:span text:style-name="T1"> </text:span><text:span text:style-name="T2">(16/33) </text:span> ⲧⲛ̅ⲟⲩⲟⲛϩ̅ ⲛⲁⲓ̈ ⲉⲃⲟⲗ· ϩⲟⲧⲁⲛ ⲇⲉ <text:line-break/><text:span text:style-name="T1"> </text:span><text:span text:style-name="T2">(16/34) </text:span> ⲉⲧⲉⲧⲛ̅ϣⲁⲛϩⲱⲡ’ ⲙ̅ⲙⲱⲧⲛ̅· <text:line-break/><text:span text:style-name="T1"> </text:span><text:span text:style-name="T2">(16/35) </text:span> ⲁⲛⲟⲕ ϩⲱⲱⲧ’ ϯⲛⲁⲟⲩⲟⲛϩⲧ̅’ <text:line-break/><text:span text:style-name="T1"> </text:span><text:span text:style-name="T2">(17/1) </text:span> [ⲉⲃⲟⲗ ϩⲟⲧⲁⲛ] ⲅ̣ⲁⲣ ⲉⲣ[ϣ]ⲁⲛⲧⲉⲧⲛ̅‐ <text:line-break/><text:span text:style-name="T1"> </text:span><text:span text:style-name="T2">(17/2) </text:span> [ⲟⲩⲟⲛϩⲧⲛ̅ ⲉ]ⲃⲟⲗ· ⲁⲛⲟⲕ ϩⲱⲱⲧ’ <text:line-break/><text:span text:style-name="T1"> </text:span><text:span text:style-name="T2">(17/3) </text:span> [ϯⲛⲁϩⲱⲡ’ ⲉ]ⲣ̣ⲱⲧⲛ̅· ⲛⲉⲛⲧⲁⲩ .[ <text:line-break/><text:soft-page-break/><text:span text:style-name="T1"> </text:span><text:span text:style-name="T2">(17/4) </text:span> [ 6+-] {ϩ̅ⲓ}ⲧⲟⲟⲧϥ̅ ⲙ̅ⲡ̣[ <text:line-break/><text:span text:style-name="T1"> </text:span><text:span text:style-name="T2">(17/5) </text:span> [ 6+-] ϩⲛ̅ ⲟⲩⲙⲛ̅ⲧ’ⲁⲑ̣[ⲏⲧ’ <text:line-break/><text:span text:style-name="T1"> </text:span><text:span text:style-name="T2">(17/6) </text:span> [ 6+-]ⲧⲉ· ϥⲓ ⲙ̅ⲙⲟⲉⲓ .[.]ⲧ̣ⲟⲩ <text:line-break/><text:span text:style-name="T1"> </text:span><text:span text:style-name="T2">(17/7) </text:span> [ⲉⲡⲓⲥⲧⲏ]ⲙⲏ ⲉⲃⲟⲗ ϩⲛ̅ ⲟⲩ[ⲙ̅]ⲕⲁϩ <text:line-break/><text:span text:style-name="T1"> </text:span><text:span text:style-name="T2">(17/8) </text:span> ⲛ̣̅ϩ̣[ⲏ]ⲧ’̣· ⲁⲩⲱ ⲛ̅ⲧⲉⲧⲛ̅ϣⲟⲡⲧ̅’ <text:line-break/><text:span text:style-name="T1"> </text:span><text:span text:style-name="T2">(17/9) </text:span> ⲉ̣[ⲣⲱ]ⲧ̣ⲛ̣̅ ⲉⲃⲟⲗ ϩⲛ̅ ⲟⲩⲉⲡⲓⲥⲧⲏⲙ[ⲏ] <text:line-break/><text:span text:style-name="T1"> </text:span><text:span text:style-name="T2">(17/10) </text:span> [ⲙⲛ̅ ⲟⲩ]ⲙ̣̅ⲕⲁϩ ⲛ̅ϩⲏⲧ’· ⲛ̅ⲧⲉⲧⲛ̅ϣⲟ‐ <text:line-break/><text:span text:style-name="T1"> </text:span><text:span text:style-name="T2">(17/11) </text:span> [ⲡ]ⲧ̅’̣ ⲉⲣ̣ⲱ̣ⲧⲛ̅ ⲉⲃⲟⲗ ϩⲛ̅ ϩⲉⲛⲧⲟⲡⲟⲥ <text:line-break/><text:span text:style-name="T1"> </text:span><text:span text:style-name="T2">(17/12) </text:span> ⲉⲩϭⲁⲉⲓⲏⲟⲩ· ⲁⲩⲱ ϩⲛ̅ ⲟⲩⲧⲁⲛⲟ· <text:line-break/><text:span text:style-name="T1"> </text:span><text:span text:style-name="T2">(17/13) </text:span> ⲁⲩⲱ ⲛ̅ⲧⲉⲧⲛ̅ⲧⲱⲣⲡ̅’ ⲉⲃⲟⲗ ϩⲛ̅ ⲛⲉ‐ <text:line-break/><text:span text:style-name="T1"> </text:span><text:span text:style-name="T2">(17/14) </text:span> ⲧⲛⲁⲛⲟⲩⲟⲩ ⲕⲁⲛ ϩⲛ̅ ⲟⲩⲙⲛ̅ⲧ’ϭⲁ‐ <text:line-break/><text:span text:style-name="T1"> </text:span><text:span text:style-name="T2">(17/15) </text:span> ⲉⲓⲉ ⲉⲃⲟⲗ ϩⲛ̅ ⲟⲩϣⲓⲡⲉ ϣⲟⲡⲧ̅’ <text:line-break/><text:span text:style-name="T1"> </text:span><text:span text:style-name="T2">(17/16) </text:span> ⲉⲣⲱⲧⲛ̅ ϩⲛ̅ ⲟⲩⲙⲛ̅ⲧ’ⲁⲧϣⲓⲡⲉ· <text:line-break/><text:span text:style-name="T1"> </text:span><text:span text:style-name="T2">(17/17) </text:span> ⲁⲩⲱ ⲉⲃⲟⲗ ϩⲛ̅ ⲟⲩⲙⲛ̅ⲧ’ⲁⲧϣⲓⲡⲉ <text:line-break/><text:span text:style-name="T1"> </text:span><text:span text:style-name="T2">(17/18) </text:span> ⲙⲛ̅ ⲟⲩϣⲓⲡⲉ· ϫⲡⲓⲟ ⲛ̅ⲛⲁⲙⲉ‐ <text:line-break/><text:span text:style-name="T1"> </text:span><text:span text:style-name="T2">(17/19) </text:span> ⲗⲟⲥ ϩⲛ̅ ⲧⲏⲩⲧⲛ̅· ⲁⲩⲱ ⲛ̅ⲧⲉ‐ <text:line-break/><text:span text:style-name="T1"> </text:span><text:span text:style-name="T2">(17/20) </text:span> ⲧⲛ̅ϯ ⲡⲉⲧⲛ̅ⲟⲩⲟⲉⲓ ⲉϩⲟⲩⲛ ⲉⲣⲟⲓ̈· <text:line-break/><text:span text:style-name="T1"> </text:span><text:span text:style-name="T2">(17/21) </text:span> ⲛⲉⲧ’ⲥⲟⲟⲩⲛ ⲙ̅ⲙⲟⲉⲓ ⲁⲩⲱ ⲛⲉⲧ’‐ <text:line-break/><text:span text:style-name="T1"> </text:span><text:span text:style-name="T2">(17/22) </text:span> ⲥⲟⲟⲩⲛ ⲛ̅ⲛⲁⲙⲉⲗⲟⲥ· ⲛ̅ⲧⲉⲧⲛ̅‐ <text:line-break/><text:span text:style-name="T1"> </text:span><text:span text:style-name="T2">(17/23) </text:span> ⲥⲙⲓⲛⲉ ⲛ̅ⲛ̅ⲛⲟϭ ϩⲛ̅ ⲛ̅ⲕⲟⲩⲉⲓ ⲛ̅‐ <text:line-break/><text:span text:style-name="T1"> </text:span><text:span text:style-name="T2">(17/24) </text:span> ϣⲟⲣⲡ̅’ ⲛ̅ⲕⲧⲓⲥⲙⲁ· ϯ ⲡⲉⲧⲛ̅‐ <text:line-break/><text:span text:style-name="T1"> </text:span><text:span text:style-name="T2">(17/25) </text:span> ⲟⲩⲟⲉⲓ ⲉϩⲣⲁⲓ̈ ⲉⲧⲙⲛ̅ⲧ’ϣⲏⲣⲉ <text:line-break/><text:span text:style-name="T1"> </text:span><text:span text:style-name="T2">(17/26) </text:span> ϣⲏⲙ· ⲁⲩⲱ ⲙ̅ⲡⲣ̅ⲙⲉⲥⲧⲱⲥ <text:line-break/><text:span text:style-name="T1"> </text:span><text:span text:style-name="T2">(17/27) </text:span> ϫⲉ ⲥ̅ⲥⲁⲃⲉⲕ ⲁⲩⲱ ⲟⲩⲕⲟⲩⲉⲓ <text:line-break/><text:span text:style-name="T1"> </text:span><text:span text:style-name="T2">(17/28) </text:span> ⲧⲉ· ⲟⲩⲧⲉ ⲙ̅ⲡⲣ̅ⲧⲥⲧⲟ ⲛ̅ϩⲉⲛ‐ <text:line-break/><text:span text:style-name="T1"> </text:span><text:span text:style-name="T2">(17/29) </text:span> ⲙⲛ̅ⲧⲛⲁϭ ϩⲛ̅ ϩⲉⲛⲙⲉⲣⲟⲥ ⲉⲃⲟⲗ <text:line-break/><text:span text:style-name="T1"> </text:span><text:span text:style-name="T2">(17/30) </text:span> ϩⲛ̅ ⲙ̅ⲙⲛ̅ⲧⲕⲟⲩⲉⲓ· ⲉϣⲁⲩ‐ <text:line-break/><text:span text:style-name="T1"> </text:span><text:span text:style-name="T2">(17/31) </text:span> ⲥⲟⲩⲱⲛ ⲙ̅ⲙⲛ̅ⲧ’ⲕⲟⲩⲉⲓ ⲅⲁⲣ <text:line-break/><text:span text:style-name="T1"> </text:span><text:span text:style-name="T2">(17/32) </text:span> ⲉⲃⲟⲗ ϩⲛ̅ ⲙ̅ⲙⲛ̅ⲧ’ⲛⲟϭ· ⲉⲧⲃⲉ <text:line-break/><text:span text:style-name="T1"> </text:span><text:span text:style-name="T2">(17/33) </text:span> ⲟⲩ ⲧⲉⲧⲛ̅ⲥⲁϩⲟⲩ ⲙ̅ⲙⲟⲉⲓ· <text:line-break/><text:span text:style-name="T1"> </text:span><text:span text:style-name="T2">(17/34) </text:span> ⲁⲩⲱ ⲧⲉⲧⲛ̅ⲧⲁⲉⲓⲟ ⲙ̅ⲙⲟⲉⲓ· <text:line-break/><text:span text:style-name="T1"> </text:span><text:span text:style-name="T2">(17/35) </text:span> ⲁⲧⲉⲧⲛ̅ϣⲱϭⲉ· ⲁⲩⲱ ⲁⲧⲉⲧⲛ̅‐ <text:line-break/><text:span text:style-name="T1"> </text:span><text:span text:style-name="T2">(17/36) </text:span> ⲛⲁ· ⲙ̅ⲡⲣ̅ⲡⲟⲣϫⲧ̅’ ⲉⲃⲟⲗ ϩⲛ̅ ⲛ̅ϣⲟⲣⲡ̅’ <text:line-break/><text:span text:style-name="T1"> </text:span><text:span text:style-name="T2">(18/1) </text:span> ⲛⲁⲓ̈ ⲛ̅ⲧⲁ[ⲧⲉ]ⲧ̣ⲛ̅ⲥ[ⲟⲩⲱⲛⲟⲩ· ⲟⲩⲇⲉ] <text:line-break/><text:span text:style-name="T1"> </text:span><text:span text:style-name="T2">(18/2) </text:span> ⲙ̅ⲡⲣ̅ⲛⲉϫ̣ ⲗⲁⲁⲩ [ⲉⲃⲟⲗ· ⲁⲩⲱ ⲛ̅ⲧⲉⲧⲛ̅]‐ <text:line-break/><text:span text:style-name="T1"> </text:span><text:span text:style-name="T2">(18/3) </text:span> ⲧⲥ̅ⲧⲉ ⲗⲁⲁⲩ ⲉⲃⲟⲗ ⲛ̣[ <text:line-break/><text:span text:style-name="T1"> </text:span><text:span text:style-name="T2">(18/4) </text:span> ..[...].ⲧⲥⲧⲁ ⲧⲏⲛⲉ ⲁⲩ[ⲱ <text:line-break/><text:span text:style-name="T1"> </text:span><text:span text:style-name="T2">(18/5) </text:span> [ⲥⲟⲟ]ⲩⲛ ⲙ̅ⲙⲟϥ ⲁⲛ· ⲁⲛ[ <text:line-break/><text:span text:style-name="T1"> </text:span><text:span text:style-name="T2">(18/6) </text:span> [...].ϥ· ⲧⲉⲧⲉ ⲧⲱⲉⲓ [ <text:line-break/><text:span text:style-name="T1"> </text:span><text:span text:style-name="T2">(18/7) </text:span> ϯⲥ̣[ⲟ]ⲟⲩⲛ ⲁⲛⲟⲕ ⲛ̅ⲛ̅ϣ[ⲟⲣ]ⲡ̅’[·] ⲁ̣ⲩⲱ̣ <text:line-break/><text:span text:style-name="T1"> </text:span><text:span text:style-name="T2">(18/8) </text:span> ⲛⲉⲧ’ⲙⲛ̅ⲛ̅ⲥⲁ ⲛⲁⲓ̈ ⲥⲉⲥⲟ̣ⲟ̣[ⲩⲛ ⲙ̅]ⲙ̣ⲟⲉⲓ[·] <text:line-break/><text:span text:style-name="T1"> </text:span><text:span text:style-name="T2">(18/9) </text:span> ⲁⲛⲟⲕ ⲇⲉ ⲡⲉ ⲡⲛⲟⲩⲥ ⲛ̣[ <text:line-break/><text:span text:style-name="T1"> </text:span><text:span text:style-name="T2">(18/10) </text:span> ⲁⲩⲱ ⲧⲁⲛⲁⲡⲁⲩⲥⲓⲥ ⲙ̅ⲡ[.]..[.]. ⲁ̣‐ <text:line-break/><text:span text:style-name="T1"> </text:span><text:span text:style-name="T2">(18/11) </text:span> ⲛⲟⲕ ⲡⲉ ⲡⲥⲟⲟⲩⲛ ⲙ̅ⲡⲁϣⲓⲛⲉ· ⲁⲩⲱ <text:line-break/><text:span text:style-name="T1"> </text:span><text:span text:style-name="T2">(18/12) </text:span> ⲡϭⲓⲛⲉ ⲛ̅ⲛⲉⲧ’ϣⲓⲛⲉ ⲛ̅ⲥⲱⲉⲓ· ⲁⲩⲱ <text:line-break/><text:span text:style-name="T1"> </text:span><text:span text:style-name="T2">(18/13) </text:span> ⲡⲟⲩⲁϩⲥⲁϩⲛⲉ ⲛ̅ⲛⲉⲧⲣ̅ⲁⲓⲧⲉⲓ ⲙ̅ⲙⲟⲉⲓ· <text:line-break/><text:span text:style-name="T1"> </text:span><text:span text:style-name="T2">(18/14) </text:span> ⲁⲩⲱ ⲧϭⲁⲙ ⲛ̅ⲛ̅ϭⲁⲙ ϩⲛ̅ ⲧⲁⲅⲛⲱ‐ <text:line-break/><text:soft-page-break/><text:span text:style-name="T1"> </text:span><text:span text:style-name="T2">(18/15) </text:span> ⲥⲓⲥ ⲛ̅ⲛ̅ⲁⲅ’ⲅⲉⲗⲟⲥ· ⲛ̅ⲧⲁⲩⲧⲁⲟⲩⲟ‐ <text:line-break/><text:span text:style-name="T1"> </text:span><text:span text:style-name="T2">(18/16) </text:span> ⲟⲩ ϩⲙ̅ ⲡⲁⲗⲟⲅⲟⲥ ⲁⲩⲱ ⲛ̅ⲛⲟⲩⲧⲉ <text:line-break/><text:span text:style-name="T1"> </text:span><text:span text:style-name="T2">(18/17) </text:span> ϩⲛ̅ ⲛⲟⲩⲧⲉ ⲉⲃⲟⲗ ϩⲙ̅ ⲡⲁϣⲟϫⲛⲉ· <text:line-break/><text:span text:style-name="T1"> </text:span><text:span text:style-name="T2">(18/18) </text:span> ⲁⲩⲱ ⲙ̅ⲡ̅ⲛ̅ⲁ̅ ⲛ̅ⲣⲱⲙⲉ ⲛⲓⲙ ⲉⲩ‐ <text:line-break/><text:span text:style-name="T1"> </text:span><text:span text:style-name="T2">(18/19) </text:span> ϣⲟⲟⲡ’ ⲛⲙ̅ⲙⲁⲉⲓ· ⲁⲩⲱ ⲛ̅{ϩ̅ⲓ}ⲟⲙⲉ <text:line-break/><text:span text:style-name="T1"> </text:span><text:span text:style-name="T2">(18/20) </text:span> ⲉⲩϣⲟⲟⲡ’ ⲛ̅ϩⲏⲧ’· ⲁⲛⲟⲕ ⲧⲉ ⲧⲉⲧ’‐ <text:line-break/><text:span text:style-name="T1"> </text:span><text:span text:style-name="T2">(18/21) </text:span> ⲧⲁⲉⲓⲏⲟⲩ ⲁⲩⲱ ⲧⲉⲧⲟⲩⲥⲙⲟⲩ <text:line-break/><text:span text:style-name="T1"> </text:span><text:span text:style-name="T2">(18/22) </text:span> ⲉⲣⲟⲥ· ⲁⲩⲱ ⲧⲉⲧⲟⲩⲣ̅ⲕⲁⲧⲁⲫⲣⲟ‐ <text:line-break/><text:span text:style-name="T1"> </text:span><text:span text:style-name="T2">(18/23) </text:span> ⲛⲓ ⲙ̅ⲙⲟⲥ ϩⲛ̅ ⲟⲩϣⲱⲥ· ⲁⲛⲟⲕ <text:line-break/><text:span text:style-name="T1"> </text:span><text:span text:style-name="T2">(18/24) </text:span> ⲧⲉ ϯⲣⲏⲛⲏ ⲁⲩⲱ ⲛ̅ⲧⲁⲡ̅’ⲡⲟⲗⲉⲙⲟⲥ <text:line-break/><text:span text:style-name="T1"> </text:span><text:span text:style-name="T2">(18/25) </text:span> ϣⲱⲡⲉ ⲉⲧⲃⲏⲏⲧ’· ⲁⲩⲱ ⲁⲛⲟⲕ <text:line-break/><text:span text:style-name="T1"> </text:span><text:span text:style-name="T2">(18/26) </text:span> ⲟⲩϣⲙ̅ⲙⲱ ⲁⲩⲱ ⲟⲩⲣⲙ̅ ⲛ̅ⲡⲟⲗⲓⲥ· <text:line-break/><text:span text:style-name="T1"> </text:span><text:span text:style-name="T2">(18/27) </text:span> ⲁⲛⲟⲕ ⲧⲉ ⲧⲟⲩⲥⲓⲁ· ⲁⲩⲱ ⲧⲉⲧⲉ ⲙⲛ̅‐ <text:line-break/><text:span text:style-name="T1"> </text:span><text:span text:style-name="T2">(18/28) </text:span> ⲧⲉⲥ ⲟⲩⲥⲓⲁ· ⲛⲉⲧ’ϣⲟⲟⲡ’ ⲉⲃⲟⲗ <text:line-break/><text:span text:style-name="T1"> </text:span><text:span text:style-name="T2">(18/29) </text:span> ϩⲛ̅ ⲧⲁⲥⲩⲛⲟⲩⲥⲓⲁ· ⲥⲉⲣ̅ⲁⲧ’ⲥⲟⲟⲩⲛ <text:line-break/><text:span text:style-name="T1"> </text:span><text:span text:style-name="T2">(18/30) </text:span> ⲙ̅ⲙⲟⲉⲓ· ⲁⲩⲱ ⲛⲉⲧ’ϣⲟⲟⲡ’ ϩⲛ̅ ⲧⲁ‐ <text:line-break/><text:span text:style-name="T1"> </text:span><text:span text:style-name="T2">(18/31) </text:span> ⲟⲩⲥⲓⲁ ⲛⲉⲧ’ⲥⲟⲟⲩⲛ ⲙ̅ⲙⲟⲉⲓ· <text:line-break/><text:span text:style-name="T1"> </text:span><text:span text:style-name="T2">(18/32) </text:span> ⲛⲉⲧ’ϩⲏⲛ ⲉⲣⲟⲉⲓ· ⲁⲩⲣ̅ ⲁⲧ’ⲥⲟⲟⲩⲛ <text:line-break/><text:span text:style-name="T1"> </text:span><text:span text:style-name="T2">(18/33) </text:span> ⲙ̅ⲙⲟⲉⲓ· ⲁⲩⲱ ⲛⲉⲧ’ⲟⲩⲏⲟⲩ ⲛ̅‐ <text:line-break/><text:span text:style-name="T1"> </text:span><text:span text:style-name="T2">(18/34) </text:span> ⲥⲁ ⲛ̅ⲃⲟⲗ ⲙ̅ⲙⲟⲉⲓ ⲛⲉⲛⲧⲁⲩⲥⲟⲩ‐ <text:line-break/><text:span text:style-name="T1"> </text:span><text:span text:style-name="T2">(18/35) </text:span> ⲱⲛⲧ̅’· ϩⲙ̅ ⲡⲉϩⲟⲟⲩ ⲉⲉⲓϩⲏⲛ ⲉϩⲟⲩ̅ <text:line-break/><text:span text:style-name="T1"> </text:span><text:span text:style-name="T2">(19/1) </text:span> [ⲉⲣⲱⲧⲛ̅ ⲧⲉⲧ]ⲛ̣̅ⲟⲩⲏⲟⲩ ⲛ̅ⲥⲁⲙⲟⲗ <text:line-break/><text:span text:style-name="T1"> </text:span><text:span text:style-name="T2">(19/2) </text:span> [ⲙ̅ⲙⲟⲉⲓ· ⲁⲩ]ⲱ̣ ϩⲙ̅ ⲡⲉϩⲟⲟⲩ ⲉⲓ̣̈‐ <text:line-break/><text:span text:style-name="T1"> </text:span><text:span text:style-name="T2">(19/3) </text:span> [ⲟⲩⲏⲟⲩ ⲛ̅ⲥⲁ] ⲛ̅ⲃⲟⲗ ⲙ̅ⲙⲱ̣[ⲧⲛ̅ ϯ]‐ <text:line-break/><text:span text:style-name="T1"> </text:span><text:span text:style-name="T2">(19/4) </text:span> [ϩⲏⲛ ⲉϩⲟ]ⲩ̣ⲛ ⲉⲣⲱⲧⲛ̅[·] ⲁⲛ̣[ⲟⲕ ⲡⲉ] <text:line-break/><text:span text:style-name="T1"> </text:span><text:span text:style-name="T2">(19/5) </text:span> [.....]ⲱ̣ⲃⲥ̅ ⲙ̅ⲫⲏⲧ’· ⲁ[ⲛⲟⲕ ⲡⲉ] <text:line-break/><text:span text:style-name="T1"> </text:span><text:span text:style-name="T2">(19/6) </text:span> [ 7+- ] ⲛⲙ̅ⲫⲩⲥⲓⲥ· ⲁ[ⲛⲟ]ⲕ ⲡⲉ <text:line-break/><text:span text:style-name="T1"> </text:span><text:span text:style-name="T2">(19/7) </text:span> [ 6+-]ⲧⲉ ⲛ̅ⲧⲕⲧⲓⲥⲓⲥ ⲛ̅ⲛⲙ̅ⲡ̅ⲛ̣̅̅[̅ⲁ̅] <text:line-break/><text:span text:style-name="T1"> </text:span><text:span text:style-name="T2">(19/8) </text:span> [.....]ⲁ̣ⲓⲧⲏⲙⲁ ⲛ̅ⲛ̅ⲯⲩⲭⲟⲟⲩⲉ <text:line-break/><text:span text:style-name="T1"> </text:span><text:span text:style-name="T2">(19/9) </text:span> [ⲁⲛⲟⲕ] ⲡ̣ⲉ ⲡⲁⲙⲁϩⲧⲉ· ⲁⲩⲱ ⲡⲁⲧⲁ‐ <text:line-break/><text:span text:style-name="T1"> </text:span><text:span text:style-name="T2">(19/10) </text:span> [ⲙⲁ]ϩ̣ⲧ̣[ⲉ·] ⲁⲛⲟⲕ ⲡⲉ ⲡϩⲱⲧⲣ̅ ⲙⲛ̅ <text:line-break/><text:span text:style-name="T1"> </text:span><text:span text:style-name="T2">(19/11) </text:span> ⲡⲃⲱⲗ ⲉⲃⲟⲗ· ⲁⲛⲟⲕ ⲡⲉ ⲧ’ⲙⲟⲛⲏ· <text:line-break/><text:span text:style-name="T1"> </text:span><text:span text:style-name="T2">(19/12) </text:span> ⲁⲩⲱ ⲁⲛⲟⲕ ⲡⲉ ⲡⲃⲱⲗ· ⲁⲛⲟⲕ <text:line-break/><text:span text:style-name="T1"> </text:span><text:span text:style-name="T2">(19/13) </text:span> ⲡⲉ ⲡⲓⲉⲡⲓⲧⲛ̅ ⲁⲩⲱ ⲉⲩⲛ̅ⲛⲏⲟⲩ <text:line-break/><text:span text:style-name="T1"> </text:span><text:span text:style-name="T2">(19/14) </text:span> ⲉϩⲣⲁⲓ̈ ⲉⲧⲟⲟⲧ’· ⲁⲛⲟⲕ ⲡⲉ ⲫⲁⲡ’ <text:line-break/><text:span text:style-name="T1"> </text:span><text:span text:style-name="T2">(19/15) </text:span> ⲙⲛ̅ ⲡⲕⲱ ⲉⲃⲟⲗ· ⲁⲛⲟⲕ ⲁⲛⲟⲕ <text:line-break/><text:span text:style-name="T1"> </text:span><text:span text:style-name="T2">(19/16) </text:span> ⲟⲩⲁⲧⲛⲟⲃⲉ· ⲁⲩⲱ ⲧⲛⲟⲩⲛⲉ <text:line-break/><text:span text:style-name="T1"> </text:span><text:span text:style-name="T2">(19/17) </text:span> ⲙ̅ⲡⲛⲟⲃⲉ ⲟⲩⲉⲃⲟⲗ ⲛ̅ϩⲏⲧ’ ⲧⲉ· <text:line-break/><text:span text:style-name="T1"> </text:span><text:span text:style-name="T2">(19/18) </text:span> ⲁⲛⲟⲕ ⲧⲉ ⲧⲉⲡⲓⲑⲩⲙⲓⲁ ϩⲛ̅ ⲟⲩ‐ <text:line-break/><text:span text:style-name="T1"> </text:span><text:span text:style-name="T2">(19/19) </text:span> ϩⲟⲣⲁⲥⲓⲥ· ⲁⲩⲱ ⲧⲉⲅ’ⲕⲣⲁⲧⲉⲓⲁ <text:line-break/><text:span text:style-name="T1"> </text:span><text:span text:style-name="T2">(19/20) </text:span> ⲙ̅ⲫⲏⲧ’ ⲉⲥϣⲟⲟⲡ’ ⲛ̅ϩⲏⲧ’· ⲁⲛⲟⲕ <text:line-break/><text:span text:style-name="T1"> </text:span><text:span text:style-name="T2">(19/21) </text:span> ⲡⲉ ⲡⲥⲱⲧⲙ̅ ⲉⲧ’ϣⲏⲡ’ ⲛ̅ⲟⲩⲟⲛ <text:line-break/><text:span text:style-name="T1"> </text:span><text:span text:style-name="T2">(19/22) </text:span> ⲛⲓⲙ· ⲙⲛ̅ ⲡϣⲁϫⲉ ⲉⲧⲉ ⲙⲁⲩϣⲉ‐ <text:line-break/><text:span text:style-name="T1"> </text:span><text:span text:style-name="T2">(19/23) </text:span> ⲙⲁϩⲧⲉ ⲙ̅ⲙⲟϥ· ⲁⲛⲟⲕ ⲟⲩⲉⲃⲱ <text:line-break/><text:span text:style-name="T1"> </text:span><text:span text:style-name="T2">(19/24) </text:span> ⲉⲙⲁⲥϣⲁϫⲉ· ⲁⲩⲱ ⲛⲁϣⲉ <text:line-break/><text:span text:style-name="T1"> </text:span><text:span text:style-name="T2">(19/25) </text:span> ⲧⲁⲙⲛ̅ⲧ’ϩⲁϩ ⲛ̅ϣⲁϫⲉ· ⲥⲱⲧⲙ̅ <text:line-break/><text:span text:style-name="T1"> </text:span><text:span text:style-name="T2">(19/26) </text:span> ⲉⲣⲟⲉⲓ ϩⲛ̅ ⲟⲩϭⲱⲛ· ⲁⲩⲱ ⲛ̅ⲧⲉ‐ <text:line-break/><text:soft-page-break/><text:span text:style-name="T1"> </text:span><text:span text:style-name="T2">(19/27) </text:span> ⲧⲛ̅ϫⲓ ⲥⲃⲱ ⲉⲣⲟⲉⲓ ϩⲛ̅ ⲟⲩⲛ̅ϣⲟⲧ’· <text:line-break/><text:span text:style-name="T1"> </text:span><text:span text:style-name="T2">(19/28) </text:span> ⲁⲛⲟⲕ ⲧⲉⲧⲁϣ ϭⲏⲗ ⲉⲃⲟⲗ· <text:line-break/><text:span text:style-name="T1"> </text:span><text:span text:style-name="T2">(19/29) </text:span> ⲁⲩⲱ ⲉⲩⲛⲟⲩϫⲉ ⲙ̅‐ <text:line-break/><text:span text:style-name="T1"> </text:span><text:span text:style-name="T2">(19/30) </text:span> ⲙⲟⲉⲓ ⲉⲃⲟⲗ {ϩ̅ⲓ}ϫⲙ̅ ⲡϩⲟ ⲙ̅ⲡⲕⲁϩ· <text:line-break/><text:span text:style-name="T1"> </text:span><text:span text:style-name="T2">(19/31) </text:span> ⲁⲛⲟⲕ ⲉⲧ’ⲥⲟⲃⲧⲉ ⲙ̅ⲡⲟⲉⲓⲕ ⲙⲛ̅ <text:line-break/><text:span text:style-name="T1"> </text:span><text:span text:style-name="T2">(19/32) </text:span> ⲡⲁⲛⲟⲩⲥ ⲉϩⲟⲩⲛ· ⲁⲛⲟⲕ ⲧⲉ ⲧ’‐ <text:line-break/><text:span text:style-name="T1"> </text:span><text:span text:style-name="T2">(19/33) </text:span> ⲅⲛⲱⲥⲓⲥ ⲙ̅ⲡⲁⲣⲁⲛ· ⲁⲛⲟⲕ ⲧⲉ‐ <text:line-break/><text:span text:style-name="T1"> </text:span><text:span text:style-name="T2">(19/34) </text:span> ⲧⲁϣⲕⲁⲕ ⲉⲃⲟⲗ· ⲁⲩⲱ ⲁⲛⲟⲕ ⲉⲧ’‐ <text:line-break/><text:span text:style-name="T1"> </text:span><text:span text:style-name="T2">(19/35) </text:span> ϫⲓ ⲥⲙⲏ· <text:line-break/><text:span text:style-name="T1"> </text:span><text:span text:style-name="T2">(20/1) </text:span> ϯⲟⲩⲟⲛϩ̣̅ ⲉ̣ⲃⲟⲗ ⲁⲩ[ⲱ <text:line-break/><text:span text:style-name="T1"> </text:span><text:span text:style-name="T2">(20/2) </text:span> ⲙⲟⲟϣⲉ ϩⲛ̅ ⲟⲩⲡ[ <text:line-break/><text:span text:style-name="T1"> </text:span><text:span text:style-name="T2">(20/3) </text:span> ⲥ̣ⲫ[ⲣ]ⲁ̣ⲅⲓⲥ ⲛ̅ⲧⲁⲙⲁ̣[ <text:line-break/><text:span text:style-name="T1"> </text:span><text:span text:style-name="T2">(20/4) </text:span> [....].ⲉ̣ⲓⲟⲛ ⲙ̅ⲡϫⲛ̣ .[ <text:line-break/><text:span text:style-name="T1"> </text:span><text:span text:style-name="T2">(20/5) </text:span> [...]ⲁ̣ⲉ[·] ⲁⲛⲟⲕ ⲡⲉ̣[ <text:line-break/><text:span text:style-name="T1"> </text:span><text:span text:style-name="T2">(20/6) </text:span> [....]ⲧⲉ ⲧⲁⲡⲟⲗⲟⲅⲓⲁ .[ <text:line-break/><text:span text:style-name="T1"> </text:span><text:span text:style-name="T2">(20/7) </text:span> ⲁⲛ[ⲟ]ⲕ̣ ⲧⲉⲧⲉ ϣⲁⲩⲙⲟⲩⲧ̣[ⲉ ⲉⲣⲟⲥ ϫⲉ] <text:line-break/><text:span text:style-name="T1"> </text:span><text:span text:style-name="T2">(20/8) </text:span> ⲧⲙⲉ· ⲁⲩⲱ ⲡϫⲓ ⲛϭⲟⲛⲥ̣̅ [ <text:line-break/><text:span text:style-name="T1"> </text:span><text:span text:style-name="T2">(20/9) </text:span> ⲧⲉⲧⲛ̅ⲧⲁⲉⲓⲟ ⲙ̅ⲙⲟⲉⲓ ⲛ[ <text:line-break/><text:span text:style-name="T1"> </text:span><text:span text:style-name="T2">(20/10) </text:span> ⲁⲩⲱ ⲧⲉⲧⲛ̅ⲕⲁⲥⲕⲥ̅ ⲉⲣ[ⲟⲓ̈] ⲛ[ⲉⲧ]ⲟⲩ‐ <text:line-break/><text:span text:style-name="T1"> </text:span><text:span text:style-name="T2">(20/11) </text:span> ϫⲣⲟⲉⲓⲧ’ ⲉⲣⲟⲟⲩ· ⲉⲣⲓⲕⲣⲓⲛⲉ ⲙ̅ⲙⲟ‐ <text:line-break/><text:span text:style-name="T1"> </text:span><text:span text:style-name="T2">(20/12) </text:span> ⲟⲩ ⲉⲙⲡⲁⲧⲟⲩϯ ϩⲁⲡ’ ⲉⲣⲱⲧⲛ̅· <text:line-break/><text:span text:style-name="T1"> </text:span><text:span text:style-name="T2">(20/13) </text:span> ⲉⲃⲟⲗ ϫⲉ ⲡⲉⲕⲣⲓⲧⲏⲥ ⲙⲛ̅ ⲡϫⲓ ϩⲟ ⲉⲩ‐ <text:line-break/><text:span text:style-name="T1"> </text:span><text:span text:style-name="T2">(20/14) </text:span> ϣⲟⲟⲡ’ ϩⲛ̅ ⲧⲏⲛⲉ· ⲉⲩϣⲁⲛϭⲁⲉⲓⲉ <text:line-break/><text:span text:style-name="T1"> </text:span><text:span text:style-name="T2">(20/15) </text:span> ⲧⲏⲛⲉ ⲉⲃⲟⲗ ϩⲙ̅ ⲡⲁⲓ̈ ⲛⲓⲙ ⲡⲉⲧⲛⲁ‐ <text:line-break/><text:span text:style-name="T1"> </text:span><text:span text:style-name="T2">(20/16) </text:span> ⲕⲁ ⲧⲏⲛⲉ ⲉⲃⲟⲗ· ⲏ%0 ⲉⲩϣⲁⲛⲕⲁ ⲧⲏ‐ <text:line-break/><text:span text:style-name="T1"> </text:span><text:span text:style-name="T2">(20/17) </text:span> ⲛⲉ ⲉⲃⲟⲗ ⲛ̅ϩⲏⲧϥ̅ ⲛⲓⲙ ⲡⲉⲧⲛⲁϣⲁ‐ <text:line-break/><text:span text:style-name="T1"> </text:span><text:span text:style-name="T2">(20/18) </text:span> ⲙⲁϩⲧⲉ ⲙ̅ⲙⲱⲧⲛ̅· ⲡⲉⲧⲛ̅ⲡⲉⲧⲛ̅‐ <text:line-break/><text:span text:style-name="T1"> </text:span><text:span text:style-name="T2">(20/19) </text:span> ⲥⲁⲛϩⲟⲩⲛ ⲅⲁⲣ ⲡⲉ ⲡⲉⲧⲛ̅ⲡⲉⲧⲛ̅ⲥⲁⲛ‐ <text:line-break/><text:span text:style-name="T1"> </text:span><text:span text:style-name="T2">(20/20) </text:span> ⲃⲟⲗ· ⲁⲩⲱ ⲡⲉⲧⲣ̅ⲡⲗⲁⲥⲥⲉ ⲛ̅ⲥⲁⲃⲟⲗ <text:line-break/><text:span text:style-name="T1"> </text:span><text:span text:style-name="T2">(20/21) </text:span> ⲙ̅ⲙⲱⲧⲛ̅· ⲛ̅ⲧⲁϥⲣ̅ⲧⲩⲡⲟⲩ ⲙ̅ⲙⲟϥ <text:line-break/><text:span text:style-name="T1"> </text:span><text:span text:style-name="T2">(20/22) </text:span> ⲙ̅ⲡⲉⲧⲛ̅ⲥⲁⲛϩⲟⲩⲛ· ⲁⲩⲱ ⲡⲉⲧⲉ‐ <text:line-break/><text:span text:style-name="T1"> </text:span><text:span text:style-name="T2">(20/23) </text:span> ⲧⲛ̅ⲛⲁⲩ ⲉⲣⲟϥ ⲙ̅ⲡⲉⲧⲛ̅ⲥⲁⲛⲃⲟⲗ· <text:line-break/><text:span text:style-name="T1"> </text:span><text:span text:style-name="T2">(20/24) </text:span> ⲧⲉⲧⲛ̅ⲛⲁⲩ ⲉⲣⲟϥ ⲙ̅ⲡⲉⲧⲛ̅ⲥⲁⲛϩⲟⲩ̅ <text:line-break/><text:span text:style-name="T1"> </text:span><text:span text:style-name="T2">(20/25) </text:span> ϥⲟⲩⲟⲛϩ̅ ⲉⲃⲟⲗ· ⲁⲩⲱ ⲧⲉⲧⲛ̅ϩⲃ̅ⲥⲱ <text:line-break/><text:span text:style-name="T1"> </text:span><text:span text:style-name="T2">(20/26) </text:span> ⲧⲉ· ⲥⲱⲧⲙ̅ ⲉⲣⲟⲓ̈ ⲛⲁⲕⲣⲟⲁⲧⲏⲥ <text:line-break/><text:span text:style-name="T1"> </text:span><text:span text:style-name="T2">(20/27) </text:span> ⲁⲩⲱ ⲛ̅ⲧⲉⲧⲛ̅ϫⲓ ⲥⲃⲱ ⲉⲛⲁϣⲁϫⲉ· <text:line-break/><text:span text:style-name="T1"> </text:span><text:span text:style-name="T2">(20/28) </text:span> ⲛⲉⲧ’ⲥⲟⲟⲩⲛ ⲙ̅ⲙⲟⲉⲓ ⲁⲛⲟⲕ ⲡⲉ <text:line-break/><text:span text:style-name="T1"> </text:span><text:span text:style-name="T2">(20/29) </text:span> ⲡⲥⲱⲧⲙ̅ ⲉⲧ’ϣⲏⲡ’ ⲛ̅ϩⲱⲃ ⲛⲓⲙ· <text:line-break/><text:span text:style-name="T1"> </text:span><text:span text:style-name="T2">(20/30) </text:span> ⲁⲛⲟⲕ ⲡⲉ ⲡϣⲁϫⲉ ⲉⲧⲉ ⲙⲁⲩ‐ <text:line-break/><text:span text:style-name="T1"> </text:span><text:span text:style-name="T2">(20/31) </text:span> ϣⲁⲙⲁϩⲧⲉ ⲙ̅ⲙⲟϥ· ⲁⲛⲟⲕ ⲡⲉ <text:line-break/><text:span text:style-name="T1"> </text:span><text:span text:style-name="T2">(20/32) </text:span> ⲡⲣⲁⲛ ⲛ̅ⲧ’ⲥⲙⲏ· ⲁⲩⲱ ⲧⲉⲥⲙⲏ <text:line-break/><text:span text:style-name="T1"> </text:span><text:span text:style-name="T2">(20/33) </text:span> ⲙ̅ⲡⲣⲁⲛ· ⲁⲛⲟⲕ ⲡⲉ ⲡⲥⲏⲙⲉⲓ‐ <text:line-break/><text:span text:style-name="T1"> </text:span><text:span text:style-name="T2">(20/34) </text:span> ⲟⲛ ⲙ̅ⲡⲥ’ϩ←ⲁⲓ̈· ⲁⲩⲱ ⲡⲟⲩⲱⲛϩ̅ ⲉⲃⲟⲗ <text:line-break/><text:span text:style-name="T1"> </text:span><text:span text:style-name="T2">(20/35) </text:span> ⲛ̅ⲧⲇⲓϩⲉⲣⲉⲥⲓⲥ· ⲁⲩⲱ ⲁⲛⲟⲕ <text:line-break/><text:span text:style-name="T1"> </text:span><text:span text:style-name="T2">(21/3) </text:span> (lines 1-3 lacking) <text:line-break/><text:span text:style-name="T1"> </text:span><text:span text:style-name="T2">(21/4) </text:span> [ 7+- ]ⲡ̣ⲟⲩⲟⲉⲓⲛ [ <text:line-break/><text:span text:style-name="T1"> </text:span><text:span text:style-name="T2">(21/5) </text:span> [ 7+- ]. ⲁⲩⲱ ⲑ[ <text:line-break/><text:soft-page-break/><text:span text:style-name="T1"> </text:span><text:span text:style-name="T2">(21/6) </text:span> [ 6+-ⲛ]ⲁⲕⲣⲟⲁⲧ[ⲏⲥ <text:line-break/><text:span text:style-name="T1"> </text:span><text:span text:style-name="T2">(21/7) </text:span> [.....] ⲉⲣⲱⲧⲛ̅· ϥⲟ ⲛ[...].[ <text:line-break/><text:span text:style-name="T1"> </text:span><text:span text:style-name="T2">(21/8) </text:span> [.....ⲛ̅]ⲧⲛⲟϭ ⲛ̅ϭⲟⲙ· ⲁⲩⲱ ⲡ. <text:line-break/><text:span text:style-name="T1"> </text:span><text:span text:style-name="T2">(21/9) </text:span> [......]ⲧϥ̅ ⲛⲁⲕⲓⲙ ⲁⲛ ⲙ̅ⲡⲣⲁⲛ· <text:line-break/><text:span text:style-name="T1"> </text:span><text:span text:style-name="T2">(21/10) </text:span> [.....] ⲉⲣⲁⲧϥ̅ ⲡⲉⲛⲧⲁϥⲧⲁⲙⲓⲟⲓ̈· <text:line-break/><text:span text:style-name="T1"> </text:span><text:span text:style-name="T2">(21/11) </text:span> ⲁ[ⲛ]ⲟⲕ ⲇⲉ ϯⲛⲁϫⲱ ⲙ̅ⲡⲉϥⲣⲁⲛ· <text:line-break/><text:span text:style-name="T1"> </text:span><text:span text:style-name="T2">(21/12) </text:span> ⲁⲛⲁⲩ ϭⲉ ⲉⲛⲉϥϣⲁϫⲉ ⲙⲛ̅ ⲛ̅ⲥϩⲁⲓ̈ <text:line-break/><text:span text:style-name="T1"> </text:span><text:span text:style-name="T2">(21/13) </text:span> ⲧⲏⲣⲟⲩ ⲛ̅ⲧⲁⲩϫⲱⲕ ⲉⲃⲟⲗ· ϯ‐ <text:line-break/><text:span text:style-name="T1"> </text:span><text:span text:style-name="T2">(21/14) </text:span> ϩⲧⲏⲧⲛ̅ ϭⲉ ⲛⲁⲕⲣⲟⲁⲧⲏⲥ ⲁⲩⲱ ⲛ̅‐ <text:line-break/><text:span text:style-name="T1"> </text:span><text:span text:style-name="T2">(21/15) </text:span> ⲧⲱⲧⲛ̅ ϩⲱⲧ’ⲧⲏⲩⲧⲛ̅ ⲛ̅ⲛⲁⲅ’ⲅⲉ‐ <text:line-break/><text:span text:style-name="T1"> </text:span><text:span text:style-name="T2">(21/16) </text:span> ⲗⲟⲥ ⲙⲛ̅ ⲛⲉⲛⲧⲁⲩⲧⲁⲟⲩⲟⲟⲩ· <text:line-break/><text:span text:style-name="T1"> </text:span><text:span text:style-name="T2">(21/17) </text:span> ⲁⲩⲱ ⲙ̅ⲡ̅ⲛ̅ⲁ̅ ⲛ̅ⲧⲁⲩⲧⲱⲱⲛ ⲉⲃⲟⲗ <text:line-break/><text:span text:style-name="T1"> </text:span><text:span text:style-name="T2">(21/18) </text:span> ϩⲛ̅ ⲛⲉⲧ’ⲙⲟⲟⲩⲧ’· ϫⲉ ⲁⲛⲟⲕ ⲡⲉⲧ’‐ <text:line-break/><text:span text:style-name="T1"> </text:span><text:span text:style-name="T2">(21/19) </text:span> ϣⲟⲟⲡ’ ⲟⲩⲁⲁⲧ’· ⲁⲩⲱ ⲙ̅ⲙⲛ̅ⲧⲁⲉⲓ <text:line-break/><text:span text:style-name="T1"> </text:span><text:span text:style-name="T2">(21/20) </text:span> ⲡⲉⲧⲛⲁⲕⲣⲓⲛⲉ ⲙ̅ⲙⲟⲉⲓ· ϩⲁϩ ⲅⲁⲣ <text:line-break/><text:span text:style-name="T1"> </text:span><text:span text:style-name="T2">(21/21) </text:span> ⲛ̅ⲉⲓⲇⲟⲥ ⲉⲩϩⲟⲗⲉϭ ⲛⲉ ⲛⲉⲧ’‐ <text:line-break/><text:span text:style-name="T1"> </text:span><text:span text:style-name="T2">(21/22) </text:span> ϣⲟⲟⲡ’ ϩⲛ̅ ϩⲉⲛⲛⲟⲃⲉ ⲉⲛⲁϣⲱ‐ <text:line-break/><text:span text:style-name="T1"> </text:span><text:span text:style-name="T2">(21/23) </text:span> ⲟⲩ· ⲁⲩⲱ ϩⲉⲛⲙⲛ̅ⲧ’ⲁⲧⲁⲙⲁϩⲧⲉ <text:line-break/><text:span text:style-name="T1"> </text:span><text:span text:style-name="T2">(21/24) </text:span> ⲙⲛ̅ ϩⲉⲛⲡⲁⲑⲟⲥ ⲉⲩϭⲁⲉⲓⲏⲩ· <text:line-break/><text:span text:style-name="T1"> </text:span><text:span text:style-name="T2">(21/25) </text:span> ⲁⲩⲱ ϩⲉⲛϩⲏⲇⲟⲛⲏ ⲡⲣⲟⲥ ⲡⲉ‐ <text:line-break/><text:span text:style-name="T1"> </text:span><text:span text:style-name="T2">(21/26) </text:span> ⲟⲩⲟⲉⲓϣ· ⲉⲩⲁⲙⲁϩⲧⲉ ⲙ̅ⲙⲟ‐ <text:line-break/><text:span text:style-name="T1"> </text:span><text:span text:style-name="T2">(21/27) </text:span> ⲟⲩ ϣⲁⲛⲧⲟⲩⲣ̅ⲛⲏⲫⲉ ⲛ̅ⲥⲉ‐ <text:line-break/><text:span text:style-name="T1"> </text:span><text:span text:style-name="T2">(21/28) </text:span> ⲡⲱⲧ’ ⲉϩⲣⲁⲓ̈ ⲉⲡⲟⲩⲕⲏⲙⲏ‐ <text:line-break/><text:span text:style-name="T1"> </text:span><text:span text:style-name="T2">(21/29) </text:span> ⲧⲏⲣⲓⲟⲛ· ⲁⲩⲱ ⲥⲉⲛⲁϭⲓⲛⲉ ⲙ̅‐ <text:line-break/><text:span text:style-name="T1"> </text:span><text:span text:style-name="T2">(21/30) </text:span> ⲙⲟⲉⲓ ⲙ̅ⲡⲙⲁ ⲉⲧⲙ̅ⲙⲁⲩ ⲛ̅ⲥⲉ‐ <text:line-break/><text:span text:style-name="T1"> </text:span><text:span text:style-name="T2">(21/31) </text:span> ⲱⲛϩ̅· ⲁⲩⲱ ⲛ̅ⲥⲉⲧⲙ̅ⲥⲱⲧ’ <text:line-break/><text:span text:style-name="T1"> </text:span><text:span text:style-name="T2">(21/32) </text:span> ⲉⲙⲟⲩ· </text:p>
      <text:p text:style-name="P1"/>
      <text:p text:style-name="P3">( codex VI ) Authoritative Teaching</text:p>
      <text:p text:style-name="P2"><text:span text:style-name="T1"> </text:span><text:span text:style-name="T2">(22/2) </text:span> (lines 1-3 lacking) <text:line-break/><text:span text:style-name="T1"> </text:span><text:span text:style-name="T2">(22/3) </text:span> [.....] ⲁ̣ⲁ̣ϥ̣ ⲡⲁϩ.[ <text:line-break/><text:span text:style-name="T1"> </text:span><text:span text:style-name="T2">(22/4) </text:span> [ 6+- ] ⲡ’ ⲉϥⲙⲟⲧ̣[ⲛ̅ <text:line-break/><text:span text:style-name="T1"> </text:span><text:span text:style-name="T2">(22/5) </text:span> [ 6+- ] ϩⲛ̅ ⲧⲡⲉ ⲛ̅ⲁ.[ <text:line-break/><text:span text:style-name="T1"> </text:span><text:span text:style-name="T2">(22/6) </text:span> [ 6+- ]ⲡ’ ϩⲣⲁⲓ̈ ⲛ̅ϩⲏⲧϥ̅[ <text:line-break/><text:span text:style-name="T1"> </text:span><text:span text:style-name="T2">(22/7) </text:span> [.]ⲗ̣ⲁ̣ⲁⲩ ⲟⲩⲱⲛϩ̅ ⲉⲃⲟ[ⲗ <text:line-break/><text:span text:style-name="T1"> </text:span><text:span text:style-name="T2">(22/8) </text:span> ⲙ̅ⲡⲏⲟⲩⲉ ⲉⲧ’ϩⲏⲡ’· ⲟ[ <text:line-break/><text:span text:style-name="T1"> </text:span><text:span text:style-name="T2">(22/9) </text:span> ⲟⲩⲟⲛϩ̅ ⲉⲃⲟⲗ· ⲁⲩⲱ ⲉⲙ[ⲡ]ⲁ[ⲧⲟ]ⲩ <text:line-break/><text:span text:style-name="T1"> </text:span><text:span text:style-name="T2">(22/10) </text:span> ⲟⲩⲱⲛϩ̅ ⲉⲃⲟⲗ ⲛ̅ϭⲓ ⲛ̅ⲕⲟⲥⲙⲟⲥ <text:line-break/><text:span text:style-name="T1"> </text:span><text:span text:style-name="T2">(22/11) </text:span> ⲛ̅ⲁϩⲟⲣⲁⲧⲟⲥ ⲛ̅ⲛⲁⲧ’ϣⲁϫⲉ ⲙ̅ⲙⲟ‐ <text:line-break/><text:span text:style-name="T1"> </text:span><text:span text:style-name="T2">(22/12) </text:span> ⲟⲩ· ⲛⲁⲓ̈ ⲛ̅ⲧⲁⲧⲯⲩⲭⲏ ⲛ̅ⲁϩⲟⲣⲁ‐ <text:line-break/><text:span text:style-name="T1"> </text:span><text:span text:style-name="T2">(22/13) </text:span> ⲧⲟⲥ ⲛ̅ⲧⲉ ⲧⲇⲓⲕⲁⲓⲟⲥⲩⲛⲏ ⲛ̅ⲧⲁⲥ‐ <text:line-break/><text:span text:style-name="T1"> </text:span><text:span text:style-name="T2">(22/14) </text:span> ⲉⲓ ⲉⲃⲟⲗ ⲛ̅ϩⲏⲧⲟⲩ ⲉⲥϣⲟⲟⲡ’ <text:line-break/><text:span text:style-name="T1"> </text:span><text:span text:style-name="T2">(22/15) </text:span> ⲛ̅ϣⲃ̅ⲣ ⲙ̅ⲙⲉⲗⲟⲥ· ⲁⲩⲱ ⲛ̅ϣⲃ̅ⲣ <text:line-break/><text:span text:style-name="T1"> </text:span><text:span text:style-name="T2">(22/16) </text:span> ⲛ̅ⲥⲱⲙⲁ· ⲁⲩⲱ ⲛ̅ϣⲃ̅ⲣ ⲙ̅ⲡ̅ⲛ̅ⲁ̅· <text:line-break/><text:span text:style-name="T1"> </text:span><text:span text:style-name="T2">(22/17) </text:span> ⲉⲓⲧⲉ ⲉⲥϣⲟⲟⲡ’ ϩⲛ̅ ⲧⲕⲁⲧⲁⲃⲁⲥⲓⲥ <text:line-break/><text:span text:style-name="T1"> </text:span><text:span text:style-name="T2">(22/18) </text:span> ⲉⲓⲧⲉ ⲉⲥϣⲟⲟⲡ’ ϩⲙ̅ ⲡⲗⲏⲣⲱⲙⲁ· <text:line-break/><text:span text:style-name="T1"> </text:span><text:span text:style-name="T2">(22/19) </text:span> ⲉⲥⲡⲟⲣϫ̅ ⲁⲛ ⲉⲣⲟⲟⲩ· ⲁⲗⲗⲁ ⲥⲉⲛⲁⲩ <text:line-break/><text:span text:style-name="T1"> </text:span><text:span text:style-name="T2">(22/20) </text:span> ⲉⲣⲟⲥ· ⲁⲩⲱ ⲥϭⲁϣⲧ̅’ ⲉⲣⲟⲟⲩ ϩⲣⲁⲓ̈ <text:line-break/><text:span text:style-name="T1"> </text:span><text:span text:style-name="T2">(22/21) </text:span> ϩⲙ̅ ⲡⲗⲟⲅⲟⲥ ⲛ̅ⲁϩⲟⲣⲁⲧⲟⲥ· ϩⲛ̅ ⲟⲩ <text:line-break/><text:span text:style-name="T1"> </text:span><text:span text:style-name="T2">(22/22) </text:span> ⲡⲉⲧ’ϩⲏⲡ’ ⲛ̅ⲧⲁⲡⲉⲥⲛⲩⲙⲫⲓⲟⲥ <text:line-break/><text:span text:style-name="T1"> </text:span><text:span text:style-name="T2">(22/23) </text:span> ⲉⲓⲛⲉ ⲙ̅ⲙⲟϥ ⲁϥⲧⲁⲁϥ ⲉⲣⲱⲥ ⲉ‐ <text:line-break/><text:span text:style-name="T1"> </text:span><text:span text:style-name="T2">(22/24) </text:span> ⲧⲣⲉⲥⲟⲱⲙ ⲙ̅ⲙⲟϥ ⲛ̅ⲑⲉ ⲛ̅ⲟⲩ‐ <text:line-break/><text:span text:style-name="T1"> </text:span><text:span text:style-name="T2">(22/25) </text:span> ⲧⲣⲟⲫⲏ· ⲁⲩⲱ ⲁϥϯ ⲙ̅ⲡⲗⲟⲅⲟⲥ <text:line-break/><text:span text:style-name="T1"> </text:span><text:span text:style-name="T2">(22/26) </text:span> ⲉⲛⲉⲥⲃⲁⲗ ⲛ̅ⲑⲉ ⲛ̅ⲟⲩⲡⲁϩⲣⲉ <text:line-break/><text:span text:style-name="T1"> </text:span><text:span text:style-name="T2">(22/27) </text:span> ⲉⲧⲣⲉⲥⲛⲁⲩ ⲉⲃⲟⲗ ϩⲙ̅ ⲡⲉⲥⲛⲟⲩⲥ <text:line-break/><text:span text:style-name="T1"> </text:span><text:span text:style-name="T2">(22/28) </text:span> ⲛ̅ⲥⲣ̅ⲛⲟⲉⲓ ⲛ̅ⲛⲉⲥⲥⲩⲅ’ⲅⲉⲛⲏⲥ· <text:line-break/><text:span text:style-name="T1"> </text:span><text:span text:style-name="T2">(22/29) </text:span> ⲛ̅ⲥϫⲓ ⲥⲟⲟⲩⲛ ⲉⲧⲉⲥⲛⲟⲩⲛⲉ· <text:line-break/><text:span text:style-name="T1"> </text:span><text:span text:style-name="T2">(22/30) </text:span> ϫⲉⲕⲁⲁⲥ ⲉⲥⲛⲁⲧⲱϭⲉ ⲉⲡⲉⲥⲕⲗⲁ <text:line-break/><text:span text:style-name="T1"> </text:span><text:span text:style-name="T2">(22/31) </text:span> ⲇⲟⲥ ⲛ̅ⲧⲁⲥⲣ̅ ϣⲣ̅ⲡ’ ⲛ̅{ⲉ̅ⲓ} ⲉⲃⲟⲗ ⲛ̅‐ <text:line-break/><text:span text:style-name="T1"> </text:span><text:span text:style-name="T2">(22/32) </text:span> ϩⲏⲧϥ̅· ϫⲉⲕⲁⲁⲥ ⲉⲥⲛⲁϫⲓ ⲙ̅ⲡⲉ‐ <text:line-break/><text:span text:style-name="T1"> </text:span><text:span text:style-name="T2">(22/33) </text:span> ⲧⲉ ⲡⲱⲥ ⲛ̅ⲥⲕⲱ ⲛ̅ⲥⲟⲥ ⲛ̅ⲑⲩ‐ <text:line-break/><text:span text:style-name="T1"> </text:span><text:span text:style-name="T2">(23/1) </text:span> [ⲗⲏ <text:line-break/><text:span text:style-name="T1"> </text:span><text:span text:style-name="T2">(23/2) </text:span> [ <text:line-break/><text:span text:style-name="T1"> </text:span><text:span text:style-name="T2">(23/3) </text:span> [ <text:line-break/><text:span text:style-name="T1"> </text:span><text:span text:style-name="T2">(23/4) </text:span> [ 6+- ]. ⲛ̅ⲑⲉ ϩⲱ̣[ <text:line-break/><text:span text:style-name="T1"> </text:span><text:span text:style-name="T2">(23/5) </text:span> [ 6+- ].ⲉ ⲁϥϩⲙⲟ[ⲟⲥ <text:line-break/><text:span text:style-name="T1"> </text:span><text:span text:style-name="T2">(23/6) </text:span> [ 6+- ]ⲉ ⲉⲩⲛ̅ⲧⲁϥ̣ [ <text:line-break/><text:span text:style-name="T1"> </text:span><text:span text:style-name="T2">(23/7) </text:span> [....]ϣⲏⲣⲉ· ⲛ̅ϣⲏⲣ̣ⲉ̣ .ⲉ <text:line-break/><text:span text:style-name="T1"> </text:span><text:span text:style-name="T2">(23/8) </text:span> [.....]ⲙ̣ⲉ ⲛⲁⲙⲉ ⲛⲁⲓ̈ ⲛ̅ⲧⲁⲩ <text:line-break/><text:span text:style-name="T1"> </text:span><text:span text:style-name="T2">(23/9) </text:span> [ϣⲱⲡⲉ] ⲉⲃⲟⲗ ϩⲙ̅ ⲡⲉϥⲥⲡⲉⲣ‐ <text:line-break/><text:span text:style-name="T1"> </text:span><text:span text:style-name="T2">(23/10) </text:span> [ⲙⲁ·] ϣ̣ⲁ̣ⲩⲙⲟⲩⲧⲉ ⲉⲛϣⲏⲣⲉ <text:line-break/><text:span text:style-name="T1"> </text:span><text:span text:style-name="T2">(23/11) </text:span> ⲛ̅ⲧⲉⲥ{ϩ̅ⲓ}ⲙⲉ ϫⲉ ⲛⲉⲛⲥⲛⲏⲟⲩ· <text:line-break/><text:span text:style-name="T1"> </text:span><text:span text:style-name="T2">(23/12) </text:span> ⲧⲁⲓ̈ ϩⲱⲱⲥ ⲧⲉ ⲑⲉ ⲛ̅ⲧⲯⲩⲭⲏ <text:line-break/><text:span text:style-name="T1"> </text:span><text:span text:style-name="T2">(23/13) </text:span> ⲙ̅ⲡ̅ⲛ̅ⲁ̅ⲧⲓⲕⲏ ⲛ̅ⲧⲉⲣⲟⲩⲛⲟϫⲥ̅ <text:line-break/><text:span text:style-name="T1"> </text:span><text:span text:style-name="T2">(23/14) </text:span> ⲉϩⲣⲁⲓ̈ ⲉⲡⲥⲱⲙⲁ· ⲁⲥϣⲱⲡⲉ <text:line-break/><text:span text:style-name="T1"> </text:span><text:span text:style-name="T2">(23/15) </text:span> ⲛ̅ⲥⲟⲛ ⲛ̅ⲧⲉⲡⲓⲑⲩⲙⲓⲁ ⲙⲛ̅ ⲡⲙⲟⲥ‐ <text:line-break/><text:soft-page-break/><text:span text:style-name="T1"> </text:span><text:span text:style-name="T2">(23/16) </text:span> ⲧⲉ ⲙⲛ̅ ⲡⲕⲱϩ· ⲁⲩⲱ ⲙ̅ⲯⲩⲭⲏ <text:line-break/><text:span text:style-name="T1"> </text:span><text:span text:style-name="T2">(23/17) </text:span> ⲛ̅ϩⲩⲗⲓⲕⲏ· ϩⲱⲥⲧⲉ ϭⲉ ⲡⲥⲱ <text:line-break/><text:span text:style-name="T1"> </text:span><text:span text:style-name="T2">(23/18) </text:span> ⲙⲁ ⲛ̅ⲧⲁϥ{ⲉ̅ⲓ} ⲉⲃⲟⲗ ϩⲛ̅ ⲧⲉⲡⲓⲑⲩ‐ <text:line-break/><text:span text:style-name="T1"> </text:span><text:span text:style-name="T2">(23/19) </text:span> ⲙⲓⲁ· ⲁⲩⲱ ⲧⲉⲡⲓⲑⲩⲙⲓⲁ ⲛ̅‐ <text:line-break/><text:span text:style-name="T1"> </text:span><text:span text:style-name="T2">(23/20) </text:span> ⲧⲁⲥⲉⲓ ⲉⲃⲟⲗ ϩⲛ̅ ⲧⲟⲩⲥⲓⲁ ⲛ̅ϩⲩ‐ <text:line-break/><text:span text:style-name="T1"> </text:span><text:span text:style-name="T2">(23/21) </text:span> ⲗⲓⲕⲏ· ⲉⲧⲃⲉ ⲡⲁⲓ̈ ⲁⲧ’ⲯⲩⲭⲏ <text:line-break/><text:span text:style-name="T1"> </text:span><text:span text:style-name="T2">(23/22) </text:span> ϣⲱⲡⲉ ⲛⲁⲩ ⲛ̅ⲥⲟⲛ· ⲕⲁⲓⲧⲟⲓ ⲅⲉ‐ <text:line-break/><text:span text:style-name="T1"> </text:span><text:span text:style-name="T2">(23/23) </text:span> ϩⲉⲛϣⲣ̅ ⲙ̅ⲡⲟⲗ ⲛⲉ· ⲙⲛ̅ ϭⲟⲙ <text:line-break/><text:span text:style-name="T1"> </text:span><text:span text:style-name="T2">(23/24) </text:span> ⲉⲧⲣⲉⲩⲣ̅ⲕⲗⲏⲣⲟⲛⲟⲙⲓ ϩⲁ ⲡϩⲟ‐ <text:line-break/><text:span text:style-name="T1"> </text:span><text:span text:style-name="T2">(23/25) </text:span> ⲟⲩⲧ’· ⲁⲗⲗⲁ ⲉⲩⲛⲁⲣ̅ⲕⲗⲏⲣⲟ <text:line-break/><text:span text:style-name="T1"> </text:span><text:span text:style-name="T2">(23/26) </text:span> ⲛⲟⲙⲓ ϩⲁ ⲧⲟⲩⲙⲁⲁⲩ ⲟⲩⲁⲁ[ⲥ]· <text:line-break/><text:span text:style-name="T1"> </text:span><text:span text:style-name="T2">(23/27) </text:span> ϩⲟⲧⲁⲛ ϭⲉ ⲉⲣϣⲁⲛⲧⲯⲩⲭⲏ <text:line-break/><text:span text:style-name="T1"> </text:span><text:span text:style-name="T2">(23/28) </text:span> ⲟⲩⲱϣⲉ ⲉⲣ̅ⲕⲗⲏⲣⲟⲛⲟⲙⲉⲓ <text:line-break/><text:span text:style-name="T1"> </text:span><text:span text:style-name="T2">(23/29) </text:span> ⲙⲛ̅ ⲛ̅ϣⲣ̅ ⲙ̅ⲡⲟⲗ· ϫⲉ ⲛ̅ⲭⲣⲏⲙⲁ <text:line-break/><text:span text:style-name="T1"> </text:span><text:span text:style-name="T2">(23/30) </text:span> ⲅⲁⲣ ⲛ̅ⲛⲓϣⲣ̅ ⲛ̅ⲡⲟⲗ· ⲛⲉ ⲛⲓⲡⲁ‐ <text:line-break/><text:span text:style-name="T1"> </text:span><text:span text:style-name="T2">(23/31) </text:span> ⲑⲟⲥ ⲛ̅ⲗⲁϩⲗⲉϩ· ⲛ̅ϩⲏⲇⲟⲛⲏ <text:line-break/><text:span text:style-name="T1"> </text:span><text:span text:style-name="T2">(23/32) </text:span> ⲛ̅ⲧⲉ ⲡⲃⲓⲟⲥ· ⲛ̅ⲕⲱϩ ⲙ̅ⲙⲟⲥ <text:line-break/><text:span text:style-name="T1"> </text:span><text:span text:style-name="T2">(23/33) </text:span> ⲧⲉ· ⲙ̅ⲡⲉⲣⲡⲉⲣⲟⲥ· ⲙ̅ⲫⲗⲟⲓ‐ <text:line-break/><text:span text:style-name="T1"> </text:span><text:span text:style-name="T2">(23/34) </text:span> ⲁⲣⲟⲥ· ⲛ̅ⲕⲁⲧⲏⲅⲟⲣⲓⲁ· <text:line-break/><text:span text:style-name="T1"> </text:span><text:span text:style-name="T2">(24/2) </text:span> (lines 1-3 lacking) <text:line-break/><text:span text:style-name="T1"> </text:span><text:span text:style-name="T2">(24/3) </text:span> [ 6+- ]...ⲛϩ̣ⲙ . [ <text:line-break/><text:span text:style-name="T1"> </text:span><text:span text:style-name="T2">(24/4) </text:span> [.....]ⲁⲛ ⲟⲩⲉⲓⲉ̣[ <text:line-break/><text:span text:style-name="T1"> </text:span><text:span text:style-name="T2">(24/5) </text:span> [.....]ⲧⲡ̅’ ⲛⲁⲥ ⲛ̅..[ <text:line-break/><text:span text:style-name="T1"> </text:span><text:span text:style-name="T2">(24/6) </text:span> ⲧⲡ[ⲟⲣⲛⲓ]ⲁ· ϣⲁϥϣⲟⲛⲉ̣[ⲥ ⲛ̅ϥⲛⲟ] <text:line-break/><text:span text:style-name="T1"> </text:span><text:span text:style-name="T2">(24/7) </text:span> ϫ̣ⲥ̅ ⲉⲡ’ⲡⲟⲣⲛⲓⲟⲛ· ⲁ[ <text:line-break/><text:span text:style-name="T1"> </text:span><text:span text:style-name="T2">(24/8) </text:span> ⲅⲁⲣ ⲛⲁⲥ ⲛ̅ⲧⲙⲛ̅ⲧ’ϣⲛ̣[ⲁ· ⲁⲥⲕⲱ] <text:line-break/><text:span text:style-name="T1"> </text:span><text:span text:style-name="T2">(24/9) </text:span> ⲛ̅ⲥⲱⲥ ⲛ̅ⲧⲙⲛ̅ⲧ’ϣⲁⲩ[·] ⲡ[ⲙ]ⲟⲩ <text:line-break/><text:span text:style-name="T1"> </text:span><text:span text:style-name="T2">(24/10) </text:span> ⲅⲁⲣ ⲙⲛ̅ ⲡⲱⲛϩ̅ ⲥⲉⲕⲁⲁⲧ’ ⲉϩⲣⲁⲓ̈ ⲛ̅‐ <text:line-break/><text:span text:style-name="T1"> </text:span><text:span text:style-name="T2">(24/11) </text:span> ⲟⲩⲟⲛ ⲛⲓⲙ· ⲡⲉⲧⲟⲩⲟϣϥ̅ ϭⲉ ϩⲙ̅ <text:line-break/><text:span text:style-name="T1"> </text:span><text:span text:style-name="T2">(24/12) </text:span> ⲡⲉⲓ̈ⲥⲛⲁⲩ ⲥⲉⲛⲁⲥⲟⲧ’ⲡϥ̅ ⲛⲁⲩ· <text:line-break/><text:span text:style-name="T1"> </text:span><text:span text:style-name="T2">(24/13) </text:span> ⲧⲁⲓ̈ ϭⲉ ⲉⲧⲙ̅ⲙⲁⲩ ⲥⲛⲁϣⲱⲡⲉ <text:line-break/><text:span text:style-name="T1"> </text:span><text:span text:style-name="T2">(24/14) </text:span> ϩⲛ̅ ⲟⲩⲙⲛ̅ⲧ’ⲥⲁⲩ ϩⲁϩ ⲛ̅ⲏⲣⲡ’ ϩⲛ̣̅ <text:line-break/><text:span text:style-name="T1"> </text:span><text:span text:style-name="T2">(24/15) </text:span> ⲟⲩⲙⲛ̅ⲧ’ϣⲛⲁ· ⲡϣⲛⲁ ⲅⲁⲣ ⲡⲉ <text:line-break/><text:span text:style-name="T1"> </text:span><text:span text:style-name="T2">(24/16) </text:span> ⲡⲏⲣⲡ̅’· ⲙⲁⲥⲣ̅ ⲡⲙⲉⲉⲩⲉ ϭⲉ ⲛ̅‐ <text:line-break/><text:span text:style-name="T1"> </text:span><text:span text:style-name="T2">(24/17) </text:span> ⲛⲉⲥⲥⲛⲏⲩ ⲙⲛ̅ ⲡⲉⲥⲉⲓⲱⲧ’· ϫⲉ <text:line-break/><text:span text:style-name="T1"> </text:span><text:span text:style-name="T2">(24/18) </text:span> ⲑⲏⲇⲟⲛⲏ ⲅⲁⲣ ⲙⲛ̅ ⲛ̅ϩⲏⲟⲩ ⲉⲧ’ <text:line-break/><text:span text:style-name="T1"> </text:span><text:span text:style-name="T2">(24/19) </text:span> ϩⲟⲗⲉϭ ⲥⲉⲣ̅ⲁⲡⲁⲧⲁ ⲙ̅ⲙⲟⲥ· ⲉⲁⲥ‐ <text:line-break/><text:span text:style-name="T1"> </text:span><text:span text:style-name="T2">(24/20) </text:span> ⲕⲱ ⲛ̅ⲥⲟⲥ ⲙ̅ⲡⲟⲥⲟⲟⲩⲛ ⲁⲥϣⲱ‐ <text:line-break/><text:span text:style-name="T1"> </text:span><text:span text:style-name="T2">(24/21) </text:span> ⲡⲉ ϩⲛ̅ ⲟⲩⲙⲛ̅ⲧ’ⲧⲃ̅ⲛⲏ· ⲟⲩⲁⲛⲟ <text:line-break/><text:span text:style-name="T1"> </text:span><text:span text:style-name="T2">(24/22) </text:span> ⲏⲧⲟⲥ ⲅⲁⲣ ⲉϥϣⲟⲟⲡ’ ϩⲛ̅ ⲟⲩⲙⲛ̅ⲧ’ <text:line-break/><text:span text:style-name="T1"> </text:span><text:span text:style-name="T2">(24/23) </text:span> ⲧⲃ̅ⲛⲏ· ⲉϥⲥⲟⲟⲩⲛ ⲁⲛ ⲙ̅ⲡⲉⲧⲉⲥ <text:line-break/><text:span text:style-name="T1"> </text:span><text:span text:style-name="T2">(24/24) </text:span> ϣⲉ ⲉϫⲟⲟϥ· ⲙⲛ̅ ⲡⲉⲧⲉϣϣⲉ ⲉ‐ <text:line-break/><text:span text:style-name="T1"> </text:span><text:span text:style-name="T2">(24/25) </text:span> ϫⲟⲟϥ ⲁⲛ· ⲡϣⲏⲣⲉ ⲇⲉ ⲛ̅ⲧⲟϥ ⲛ̅‐ <text:line-break/><text:span text:style-name="T1"> </text:span><text:span text:style-name="T2">(24/26) </text:span> ⲣⲙ̅ⲣⲁϣ· ϣⲁϥⲣ̅ⲕⲗⲏⲣⲟⲛⲟⲙⲉⲓ <text:line-break/><text:span text:style-name="T1"> </text:span><text:span text:style-name="T2">(24/27) </text:span> ⲙ̅ⲡⲉϥⲉⲓⲱⲧ’ ϩⲛ̅ ⲟⲩϩⲗⲟϭ· ⲉⲣⲉ <text:line-break/><text:span text:style-name="T1"> </text:span><text:span text:style-name="T2">(24/28) </text:span> ⲡⲉϥⲉⲓⲱⲧ’ ⲣⲁϣⲉ ⲉϩⲣⲁⲓ̈ ⲉϫⲱϥ <text:line-break/><text:span text:style-name="T1"> </text:span><text:span text:style-name="T2">(24/29) </text:span> ϫⲉ ϥϫⲓ ⲉⲟⲟⲩ ⲉⲧⲃⲏⲏⲧϥ̅ ⲛ̅ⲧⲟ‐ <text:line-break/><text:soft-page-break/><text:span text:style-name="T1"> </text:span><text:span text:style-name="T2">(24/30) </text:span> ⲟⲧϥ̅ ⲛ̅ⲟⲩⲟⲛ ⲛⲓⲙ· ⲉϥϣⲓⲛⲉ ⲟⲛ <text:line-break/><text:span text:style-name="T1"> </text:span><text:span text:style-name="T2">(24/31) </text:span> ⲛ̅ⲥⲁ ⲡⲣⲏⲧⲉ ⲛ̅ⲧⲟⲩⲕⲱⲃ ⲛ̅ϭⲓ ⲛⲉⲛ <text:line-break/><text:span text:style-name="T1"> </text:span><text:span text:style-name="T2">(24/32) </text:span> ⲧⲁϥϫⲓⲧⲟⲩ· ⲛ̅ϣⲣ̅ ⲙ̅ⲡⲟⲗ ⲅⲁⲣ <text:line-break/><text:span text:style-name="T1"> </text:span><text:span text:style-name="T2">(25/2) </text:span> (lines 1-3 lacking) <text:line-break/><text:span text:style-name="T1"> </text:span><text:span text:style-name="T2">(25/3) </text:span> [ 10+- ].[ <text:line-break/><text:span text:style-name="T1"> </text:span><text:span text:style-name="T2">(25/4) </text:span> [.....]ⲉⲧⲱϩ ⲙⲛ̅ ⲧ̣[ <text:line-break/><text:span text:style-name="T1"> </text:span><text:span text:style-name="T2">(25/5) </text:span> [..]ⲁ[.] ⲟ̣ⲩⲙⲉⲉⲩⲉ ⲅⲁ[ⲣ ⲛ̅ⲉ]ⲡ̣ⲓ‐ <text:line-break/><text:span text:style-name="T1"> </text:span><text:span text:style-name="T2">(25/6) </text:span> [ⲑ]ⲩ̣ⲙⲓⲁ ⲉϥϣⲁⲛ{ⲉ̅ⲓ} ⲉ[ϩⲟ]ⲩⲛ <text:line-break/><text:span text:style-name="T1"> </text:span><text:span text:style-name="T2">(25/7) </text:span> [ⲉ]ⲩ̣ⲣⲱⲙⲉ ⲙ̅ⲡⲁⲣⲑⲉⲛⲟⲥ· ⲁϥ‐ <text:line-break/><text:span text:style-name="T1"> </text:span><text:span text:style-name="T2">(25/8) </text:span> [ⲟⲩ]ⲱ ⲉϥϫⲱϩⲙ̅· ⲁⲩⲱ ⲧⲟⲩ‐ <text:line-break/><text:span text:style-name="T1"> </text:span><text:span text:style-name="T2">(25/9) </text:span> [ⲙⲛ̅]ⲧ’ⲟⲩⲁⲙ ϩⲁϩ· ⲙ̅ⲙⲛ̅ ϣϭⲟⲙ <text:line-break/><text:span text:style-name="T1"> </text:span><text:span text:style-name="T2">(25/10) </text:span> ⲉⲧⲣⲉⲥⲧⲱ· ⲙⲛ̅ ⲧⲙⲛ̅ⲧ’ⲙⲉⲧⲣⲓ‐ <text:line-break/><text:span text:style-name="T1"> </text:span><text:span text:style-name="T2">(25/11) </text:span> ⲟⲥ· ⲡⲧⲱϩ ⲅⲁⲣ ⲉϥϣⲁⲛⲧⲱϩ <text:line-break/><text:span text:style-name="T1"> </text:span><text:span text:style-name="T2">(25/12) </text:span> ⲙⲛ̅ ⲡⲥⲟⲩⲟ· ⲡⲧⲱϩ ⲁⲛ ⲡⲉ ⲉϣⲁϥ‐ <text:line-break/><text:span text:style-name="T1"> </text:span><text:span text:style-name="T2">(25/13) </text:span> ϫⲱϩⲙ̅· ⲁⲗⲗⲁ ⲡⲥⲟⲩⲟ ⲡⲉ· ⲉⲩ‐ <text:line-break/><text:span text:style-name="T1"> </text:span><text:span text:style-name="T2">(25/14) </text:span> ⲧⲏϩ ⲅⲁⲣ ⲙⲛ̅ ⲛⲉⲩⲉⲣⲏⲩ· ⲙⲛ̅‐ <text:line-break/><text:span text:style-name="T1"> </text:span><text:span text:style-name="T2">(25/15) </text:span> ⲗⲁⲁⲩ ⲛⲁⲧⲁⲩ ⲡⲥ̅ⲥⲟⲩⲟ ϫⲉ ϥϫⲁ‐ <text:line-break/><text:span text:style-name="T1"> </text:span><text:span text:style-name="T2">(25/16) </text:span> ϩⲙ̅· ⲥⲉⲛⲁⲣ̅ⲕⲟⲗⲁⲕⲉⲩⲉ ⲇⲉ <text:line-break/><text:span text:style-name="T1"> </text:span><text:span text:style-name="T2">(25/17) </text:span> ⲉⲣⲟϥ ϫⲉ ⲙⲁ ⲛⲁⲛ ⲡⲉⲉⲓⲧⲱϩ ⲉ‐ <text:line-break/><text:span text:style-name="T1"> </text:span><text:span text:style-name="T2">(25/18) </text:span> ⲃⲟⲗ ⲉⲩⲛⲁⲩ ⲉⲡⲥⲟⲩⲟ ⲉϥⲧⲏϩ <text:line-break/><text:span text:style-name="T1"> </text:span><text:span text:style-name="T2">(25/19) </text:span> ⲛⲙ̅ⲙⲁϥ· ϣⲁⲛⲧⲟⲩϫⲓⲧϥ̅ ⲛ̅ⲥⲉ <text:line-break/><text:span text:style-name="T1"> </text:span><text:span text:style-name="T2">(25/20) </text:span> ⲛⲟϫϥ̅ ⲙⲛ̅ ϩⲉⲛⲕⲉⲧⲱϩ ⲧⲏⲣⲟⲩ· <text:line-break/><text:span text:style-name="T1"> </text:span><text:span text:style-name="T2">(25/21) </text:span> ⲛ̅ⲧⲉⲡⲧⲱϩ ⲉⲧⲙ̅ⲙⲁⲩ ⲛ̅ϥ‐ <text:line-break/><text:span text:style-name="T1"> </text:span><text:span text:style-name="T2">(25/22) </text:span> ⲧⲱϩ ⲙⲛ̅ ϩⲉⲛⲕⲉϩⲩⲗⲏ ⲧⲏⲣⲟⲩ· <text:line-break/><text:span text:style-name="T1"> </text:span><text:span text:style-name="T2">(25/23) </text:span> ⲟⲩⲥⲡⲉⲣⲙⲁ ⲛ̅ⲧⲟϥ ⲉϥⲟⲩⲁⲁⲃ <text:line-break/><text:span text:style-name="T1"> </text:span><text:span text:style-name="T2">(25/24) </text:span> ϣⲁⲩⲣⲟⲉⲓⲥ ⲉⲣⲟϥ ϩⲛ̅ ϩⲉⲛⲁⲡⲟ <text:line-break/><text:span text:style-name="T1"> </text:span><text:span text:style-name="T2">(25/25) </text:span> ⲑⲏⲕⲏ ⲉⲩⲟⲣⲉϫ· ⲛⲁⲓ̈ ϭⲉ ⲧⲏⲣⲟⲩ <text:line-break/><text:span text:style-name="T1"> </text:span><text:span text:style-name="T2">(25/26) </text:span> ⲛ̅ⲧⲁⲛϫⲟⲟⲩ· ⲁⲩⲱ ϩⲁⲧⲉϩⲏ <text:line-break/><text:span text:style-name="T1"> </text:span><text:span text:style-name="T2">(25/27) </text:span> ⲉⲙⲡⲁⲧⲉⲗⲁⲁⲩ ϣⲱⲡⲉ· <text:line-break/><text:span text:style-name="T1"> </text:span><text:span text:style-name="T2">(25/28) </text:span> ⲡⲉⲓⲱⲧ’ ⲟⲩⲁⲁϥ ⲡⲉⲧ’ϣⲟⲟⲡ’· <text:line-break/><text:span text:style-name="T1"> </text:span><text:span text:style-name="T2">(25/29) </text:span> ⲉⲙⲡⲁⲧⲉⲛ̅ⲕⲟⲥⲙⲟⲥ ⲉⲧ’ϩⲛ̅ <text:line-break/><text:span text:style-name="T1"> </text:span><text:span text:style-name="T2">(25/30) </text:span> ⲙ̅ⲡⲏⲟⲩⲉ ⲟⲩⲱⲛϩ̅ ⲉⲃⲟⲗ· <text:line-break/><text:span text:style-name="T1"> </text:span><text:span text:style-name="T2">(25/31) </text:span> ⲟⲩⲧⲉ ⲡⲕⲟⲥⲙⲟⲥ ⲉⲧ’{ϩ̅ⲓ}ϫⲙ̅ <text:line-break/><text:span text:style-name="T1"> </text:span><text:span text:style-name="T2">(25/32) </text:span> ⲡⲕⲁϩ· ⲟⲩⲧⲉ ⲁⲣⲭⲏ· ⲟⲩⲧⲉ <text:line-break/><text:span text:style-name="T1"> </text:span><text:span text:style-name="T2">(25/33) </text:span> ⲉⲝⲟⲩⲥⲓⲁ· ⲟⲩⲧⲉ ⲛ̅ⲇⲩⲛⲁⲙⲓⲥ· <text:line-break/><text:span text:style-name="T1"> </text:span><text:span text:style-name="T2">(26/2) </text:span> (lines 1-3 lacking) <text:line-break/><text:span text:style-name="T1"> </text:span><text:span text:style-name="T2">(26/3) </text:span> [....ⲟⲩ]ⲱⲛϩ̅ ⲉⲃⲟⲗ ⲛ̣[ <text:line-break/><text:span text:style-name="T1"> </text:span><text:span text:style-name="T2">(26/4) </text:span> [.....]ⲁ̣ⲅⲙⲁ· ⲁⲩⲱ ϣ̣[ <text:line-break/><text:span text:style-name="T1"> </text:span><text:span text:style-name="T2">(26/5) </text:span> ϩⲉⲛ[...]ⲟⲩⲉ· ⲙ̅ⲡⲉⲗⲁⲁⲩ̣ [ⲇⲉ] <text:line-break/><text:span text:style-name="T1"> </text:span><text:span text:style-name="T2">(26/6) </text:span> ϣⲱⲡⲉ ⲉϫⲙ̅ ⲡⲉϥⲟⲩⲱϣ̣[ⲉ·] ⲛ̅‐ <text:line-break/><text:span text:style-name="T1"> </text:span><text:span text:style-name="T2">(26/7) </text:span> ⲧⲟϥ ϭⲉ ⲡⲉⲓⲱⲧ’ ⲉϥⲟⲩⲱ̣[ϣⲉ] <text:line-break/><text:span text:style-name="T1"> </text:span><text:span text:style-name="T2">(26/8) </text:span> ⲉⲟⲩⲱⲛϩ̅ ⲉⲃⲟⲗ ⲛ̅ⲧⲉϥⲙ[ⲛ̅ⲧ’ⲣⲙ̅] <text:line-break/><text:span text:style-name="T1"> </text:span><text:span text:style-name="T2">(26/9) </text:span> ⲙⲁⲟ· ⲙⲛ̅ ⲡⲉϥⲉⲟⲟⲩ· ⲁϥ̣ⲕⲱ <text:line-break/><text:span text:style-name="T1"> </text:span><text:span text:style-name="T2">(26/10) </text:span> ⲙ̅ⲡⲉⲉⲓⲛⲟϭ ⲛ̅ⲁⲅⲱⲛ ⲛ̅ϩⲣⲁⲓ̈ <text:line-break/><text:span text:style-name="T1"> </text:span><text:span text:style-name="T2">(26/11) </text:span> ϩⲙ̅ ⲡⲉⲓ̈ⲕⲟⲥⲙⲟⲥ· ⲉϥⲟⲩⲱ <text:line-break/><text:span text:style-name="T1"> </text:span><text:span text:style-name="T2">(26/12) </text:span> ϣⲉ ⲉⲧⲣⲉⲛⲁⲅⲱⲛⲓⲥⲧⲏⲱⲥ ⲟⲩ‐ <text:line-break/><text:span text:style-name="T1"> </text:span><text:span text:style-name="T2">(26/13) </text:span> ⲱⲛϩ̅ ⲉⲃⲟⲗ· ⲛ̅ⲧⲉⲛⲉⲧ’ϣⲱϫⲉ <text:line-break/><text:soft-page-break/><text:span text:style-name="T1"> </text:span><text:span text:style-name="T2">(26/14) </text:span> ⲧⲏⲣⲟⲩ ⲛ̅ⲥⲉⲕⲱ ⲛ̅ⲥⲱⲟⲩ <text:line-break/><text:span text:style-name="T1"> </text:span><text:span text:style-name="T2">(26/15) </text:span> ⲛ̅ⲛⲉⲛⲧⲁⲩϣⲱⲡⲉ· ⲛ̅ⲥⲉⲣ̅ <text:line-break/><text:span text:style-name="T1"> </text:span><text:span text:style-name="T2">(26/16) </text:span> ⲕⲁⲧⲁⲫⲣⲟⲛⲓ ⲙ̅ⲙⲟⲟⲩ ϩⲛ̅ ⲟⲩ‐ <text:line-break/><text:span text:style-name="T1"> </text:span><text:span text:style-name="T2">(26/17) </text:span> ⲥⲟⲟⲩⲛ ⲉϥϫⲟⲥⲉ ⲛ̅ⲁⲧ’ⲧⲉϩⲟϥ· <text:line-break/><text:span text:style-name="T1"> </text:span><text:span text:style-name="T2">(26/18) </text:span> ⲛ̅ⲥⲉⲡⲱⲧ’ ⲉϩⲟⲩⲛ ϣⲁ ⲡⲉⲧ’ϣⲟ‐ <text:line-break/><text:span text:style-name="T1"> </text:span><text:span text:style-name="T2">(26/19) </text:span> ⲟⲡ’· ⲁⲩⲱ ⲛⲉⲧ’ⲥⲱϫⲉ ⲛⲙ̅ⲙⲉⲛ‐ <text:line-break/><text:span text:style-name="T1"> </text:span><text:span text:style-name="T2">(26/20) </text:span> ⲉⲩⲟ ⲛ̅ⲁⲛⲧⲓⲕⲉⲓⲙⲉⲛⲟⲥ ⲉⲩ‐ <text:line-break/><text:span text:style-name="T1"> </text:span><text:span text:style-name="T2">(26/21) </text:span> ϣⲱϫⲉ ⲉϩⲏⲧⲛ̅ ⲛ̅ⲧⲛ̅ϫⲣⲟ ⲉⲧⲉⲩ‐ <text:line-break/><text:span text:style-name="T1"> </text:span><text:span text:style-name="T2">(26/22) </text:span> ⲙⲛ̅ⲧ’ⲁⲧ’ⲥⲟⲟⲩⲛ ⲛ̅ϩⲣⲁⲓ̈ ϩⲙ̅ ⲡⲛ̅‐ <text:line-break/><text:span text:style-name="T1"> </text:span><text:span text:style-name="T2">(26/23) </text:span> ⲥⲟⲟⲩⲛ· ⲉⲛⲣ̅ ϣⲣⲡ̅’ ⲛ̅ⲥⲟⲟⲩⲛ <text:line-break/><text:span text:style-name="T1"> </text:span><text:span text:style-name="T2">(26/24) </text:span> ⲁⲡⲓⲁⲧⲛ̅ⲣⲉⲧϥ̅ ⲉⲛⲧⲁⲛⲉⲓ ⲉⲃⲟⲗ <text:line-break/><text:span text:style-name="T1"> </text:span><text:span text:style-name="T2">(26/25) </text:span> ⲛ̅ϩⲏⲧϥ̅· ⲉⲙⲙⲛ̅ⲧⲁⲛ ⲗⲁⲁⲩ ϩⲙ̅ <text:line-break/><text:span text:style-name="T1"> </text:span><text:span text:style-name="T2">(26/26) </text:span> ⲡⲉⲓ̈ⲕⲟⲥⲙⲟⲥ· ⲙⲏⲡⲱⲥ ⲛ̅ⲧⲉ <text:line-break/><text:span text:style-name="T1"> </text:span><text:span text:style-name="T2">(26/27) </text:span> ⲧⲉⲝⲟⲩⲥⲓⲁ ⲙ̅ⲡⲕⲟⲥⲙⲟⲥ ⲉⲛ‐ <text:line-break/><text:span text:style-name="T1"> </text:span><text:span text:style-name="T2">(26/28) </text:span> ⲧⲁⲥϣⲱⲡⲉ ⲛ̅ⲥⲣ̅ⲕⲁⲧⲉⲭⲉ ⲙ̅ⲙⲟⲛ <text:line-break/><text:span text:style-name="T1"> </text:span><text:span text:style-name="T2">(26/29) </text:span> ϩⲛ̅ ⲛ̅ⲕⲟⲥⲙⲟⲥ ⲉⲧ’ϩⲛ̅ ⲙ̅ⲡⲏⲩⲉ· <text:line-break/><text:span text:style-name="T1"> </text:span><text:span text:style-name="T2">(26/30) </text:span> ⲛⲁⲓ̈ ⲉⲧⲉ ⲡⲙⲟⲩ ⲛ̅ⲕⲁⲑⲟⲗⲓⲕⲟⲛ <text:line-break/><text:span text:style-name="T1"> </text:span><text:span text:style-name="T2">(26/31) </text:span> ϣⲟⲟⲡ’ ϩⲣⲁⲓ̈ ⲛ̅ϩⲏⲧⲟⲩ· ⲉⲩ‐ <text:line-break/><text:span text:style-name="T1"> </text:span><text:span text:style-name="T2">(26/32) </text:span> ⲕⲱⲧⲉ ⲉⲣⲟϥ ⲛ̅ϭⲓ ⲙ̅ⲙⲉⲣⲓⲕⲟⲥ <text:line-break/><text:span text:style-name="T1"> </text:span><text:span text:style-name="T2">(27/2) </text:span> (lines 1-3 lacking) <text:line-break/><text:span text:style-name="T1"> </text:span><text:span text:style-name="T2">(27/3) </text:span> [.....]ⲩⲛ̣ⲟⲩ ⲉⲃⲟ[ⲗ <text:line-break/><text:span text:style-name="T1"> </text:span><text:span text:style-name="T2">(27/4) </text:span> [....]ⲁ̣ ⲛ̅ⲕⲟⲥⲙⲓⲕ[ⲟⲥ· ⲁⲛ]ϣ̣ⲱ‐ <text:line-break/><text:span text:style-name="T1"> </text:span><text:span text:style-name="T2">(27/5) </text:span> ⲡ̣[ⲉ] ⲟ̣ⲛ [ⲉ]ⲛϫⲓ ϣⲓⲡⲉ [ϩⲛ̅ ⲛ̅]ⲕⲟⲥⲙⲟⲥ̣ <text:line-break/><text:span text:style-name="T1"> </text:span><text:span text:style-name="T2">(27/6) </text:span> ⲉⲥ̣ⲣ̅ⲙⲉⲗⲉⲓ ⲛⲁⲛ ⲁⲛ ϩⲁⲣⲟⲟⲩ· ⲉⲩ‐ <text:line-break/><text:span text:style-name="T1"> </text:span><text:span text:style-name="T2">(27/7) </text:span> [ϣⲁ]ϫⲉ ⲛ̅ⲥⲱⲛ· ⲁⲩⲱ ⲉⲛⲱⲃϣ̅ <text:line-break/><text:span text:style-name="T1"> </text:span><text:span text:style-name="T2">(27/8) </text:span> [ⲙ̅ⲙ]ⲟ̣ⲛ ⲉⲣⲟⲟⲩ· ⲉⲩϩⲟⲟⲩϣ <text:line-break/><text:span text:style-name="T1"> </text:span><text:span text:style-name="T2">(27/9) </text:span> ⲉ̣ⲣ̣[ⲟ]ⲛ ⲉⲩϯ ϣⲓⲡⲉ ⲉϩⲟⲩⲛ ⲉϩⲙ̅ <text:line-break/><text:span text:style-name="T1"> </text:span><text:span text:style-name="T2">(27/10) </text:span> ⲡⲉⲛϩⲟ· ⲉⲛϭⲁϣⲧ̅’ ⲛ̅ⲥⲱⲟⲩ· ⲛ̅‐ <text:line-break/><text:span text:style-name="T1"> </text:span><text:span text:style-name="T2">(27/11) </text:span> ⲧⲛ̅ⲧⲙ̅ϣⲁϫⲉ· ⲛⲁⲓ̈ ⲅⲁⲣ ⲉⲧⲙ̅‐ <text:line-break/><text:span text:style-name="T1"> </text:span><text:span text:style-name="T2">(27/12) </text:span> ⲙⲁⲩ ⲉⲩⲣ̅ ϩⲱⲃ ⲉⲧⲟⲩⲉⲣⲅⲁⲥⲓⲁ· <text:line-break/><text:span text:style-name="T1"> </text:span><text:span text:style-name="T2">(27/13) </text:span> ⲁⲛⲟⲛ ⲇⲉ ⲉⲛⲙⲟⲟϣⲉ ϩⲁ ⲡϩⲕⲟ‐ <text:line-break/><text:span text:style-name="T1"> </text:span><text:span text:style-name="T2">(27/14) </text:span> ϩⲁ ⲡⲓⲃⲉ· ⲉⲛϭⲁϣⲧ̅’ ⲉⲃⲟⲗ ϩⲏⲧϥ̅ <text:line-break/><text:span text:style-name="T1"> </text:span><text:span text:style-name="T2">(27/15) </text:span> ⲙ̅ⲡⲉⲛⲙⲁ ⲛ̅ϣⲱⲡⲉ· ⲡⲙⲁ ⲉⲧⲉ‐ <text:line-break/><text:span text:style-name="T1"> </text:span><text:span text:style-name="T2">(27/16) </text:span> ⲧⲛ̅ⲡⲟⲗⲉⲓⲧⲉⲓⲁ ⲙⲛ̅ ⲧⲛ̅ⲥⲩⲛⲉⲓ‐ <text:line-break/><text:span text:style-name="T1"> </text:span><text:span text:style-name="T2">(27/17) </text:span> ⲇⲏⲥⲓⲥ ϭⲁϣⲧ̅’ ⲉⲃⲟⲗ ϩⲏⲧϥ̅· ⲉⲛ‐ <text:line-break/><text:span text:style-name="T1"> </text:span><text:span text:style-name="T2">(27/18) </text:span> ⲧⲱϭⲉ ⲙ̅ⲙⲟⲛ ⲁⲛ ⲉϩⲟⲩⲛ ⲉⲛⲉⲛ‐ <text:line-break/><text:span text:style-name="T1"> </text:span><text:span text:style-name="T2">(27/19) </text:span> ⲧⲁⲩϣⲱⲡⲉ· ⲁⲗⲗⲁ ⲉⲛⲥⲓϩⲉ <text:line-break/><text:span text:style-name="T1"> </text:span><text:span text:style-name="T2">(27/20) </text:span> ⲙ̅ⲙⲟⲛ ⲙ̅ⲙⲟⲟⲩ· ⲉⲣⲉϩⲧⲏⲛ <text:line-break/><text:span text:style-name="T1"> </text:span><text:span text:style-name="T2">(27/21) </text:span> ⲕⲁⲁⲧ’ ⲁⲛⲉⲧ’ϣⲟⲟⲡ’· ⲉⲛϣⲱ‐ <text:line-break/><text:span text:style-name="T1"> </text:span><text:span text:style-name="T2">(27/22) </text:span> ⲛⲉ ⲉⲛϭⲟⲟⲃ ⲉⲛⲙⲟⲕϩ̅· ⲉⲩⲛ̅‐ <text:line-break/><text:span text:style-name="T1"> </text:span><text:span text:style-name="T2">(27/23) </text:span> ⲟⲩⲛⲟϭ ⲇⲉ ⲙ̅ⲙⲛ̅ⲧ’ϫⲱⲱⲣⲉ ϩⲏⲡ’ <text:line-break/><text:span text:style-name="T1"> </text:span><text:span text:style-name="T2">(27/24) </text:span> ⲙ̅ⲡⲛ̅ⲥⲁⲛϩⲟⲩⲛ ⲧⲉⲛⲯⲩⲭⲏ· <text:line-break/><text:span text:style-name="T1"> </text:span><text:span text:style-name="T2">(27/25) </text:span> ⲙⲉⲛ ⲉⲥϣⲱⲛⲉ ϫⲉ ⲉⲥϣⲟⲟⲡ’ <text:line-break/><text:span text:style-name="T1"> </text:span><text:span text:style-name="T2">(27/26) </text:span> ϩⲛ̅ ⲟⲩⲏⲉⲓ ⲙ̅ⲙⲛ̅ⲧ’ϩⲏⲕⲉ· ⲉⲣⲉ‐ <text:line-break/><text:span text:style-name="T1"> </text:span><text:span text:style-name="T2">(27/27) </text:span> ⲑⲩⲗⲏ ϯ ϣϭⲁ ⲛ̅ⲛⲉⲥⲃⲁⲗ ⲉⲥ‐ <text:line-break/><text:span text:style-name="T1"> </text:span><text:span text:style-name="T2">(27/28) </text:span> ⲟⲩⲱϣⲉ ⲉⲁⲁⲥ ⲛ̅ⲃⲗ̅ⲗⲏ· <text:line-break/><text:span text:style-name="T1"> </text:span><text:span text:style-name="T2">(27/29) </text:span> ⲇⲓⲁ ⲧⲟⲩⲧⲟ ϣⲁⲥⲡⲱⲧ’ ⲛ̅ⲥⲁ‐ <text:line-break/><text:soft-page-break/><text:span text:style-name="T1"> </text:span><text:span text:style-name="T2">(27/30) </text:span> ⲡⲗⲟⲅⲟⲥ ⲛ̅ⲥⲧⲁⲁϥ ⲉⲛⲉⲥⲃⲁⲗ <text:line-break/><text:span text:style-name="T1"> </text:span><text:span text:style-name="T2">(27/31) </text:span> ⲛ̅ⲑⲉ ⲛ̅ⲟⲩⲡⲁϩⲣⲉ ⲉⲥⲟⲩⲱ[ⲛ] <text:line-break/><text:span text:style-name="T1"> </text:span><text:span text:style-name="T2">(27/32) </text:span> ⲙ̅ⲙⲟⲟⲩ· ⲉⲥⲛⲟⲩϫⲉ ⲉⲃⲟⲗ <text:line-break/><text:span text:style-name="T1"> </text:span><text:span text:style-name="T2">(28/2) </text:span> (lines 1-3 lacking) <text:line-break/><text:span text:style-name="T1"> </text:span><text:span text:style-name="T2">(28/3) </text:span> [....]ⲙ̣ⲉ̣ⲉⲩⲉ ⲛ̅ⲟⲩ[ <text:line-break/><text:span text:style-name="T1"> </text:span><text:span text:style-name="T2">(28/4) </text:span> [...ⲙⲛ̅]ⲧ̣ⲃⲗ̅ⲗⲉ ϩⲣⲁⲓ̈ ϩ[ⲛ̅ <text:line-break/><text:span text:style-name="T1"> </text:span><text:span text:style-name="T2">(28/5) </text:span> ⲉⲓⲥ̣[..]ⲉ̣· ⲙⲛ̅ⲛ̅ⲥⲱⲥ̣ ⲟⲛ ⲉϣⲱ̣‐ <text:line-break/><text:span text:style-name="T1"> </text:span><text:span text:style-name="T2">(28/6) </text:span> ⲡⲉ ⲡⲉ̣ⲧ̣ⲙ̅ⲙⲁⲩ ϣⲟⲟⲡ’ ϩⲛ̣̅ ⲟ̣ⲩ‐ <text:line-break/><text:span text:style-name="T1"> </text:span><text:span text:style-name="T2">(28/7) </text:span> ⲙⲛ̅ⲧ’ⲁⲧ’ⲥⲟⲟⲩⲛ· ⲟⲩⲕⲁ[ⲕⲉ ⲧ]ⲏ‐ <text:line-break/><text:span text:style-name="T1"> </text:span><text:span text:style-name="T2">(28/8) </text:span> ⲣϥ̅ ⲡⲉ· ⲁⲩⲱ ⲟⲩϩⲩⲗⲓⲕⲟ̣[ⲥ ⲡⲉ·] <text:line-break/><text:span text:style-name="T1"> </text:span><text:span text:style-name="T2">(28/9) </text:span> ⲧⲁⲓ̈ ⲧⲉ ⲑⲉ ⲛ̅ⲧⲯⲩⲭⲏ ⲉⲥ̣[.]. <text:line-break/><text:span text:style-name="T1"> </text:span><text:span text:style-name="T2">(28/10) </text:span> ⲛ̅ⲟⲩⲗⲟⲅⲟⲥ ⲛ̅ⲛⲁⲩ ⲛⲓⲙ ⲉⲧⲁ‐ <text:line-break/><text:span text:style-name="T1"> </text:span><text:span text:style-name="T2">(28/11) </text:span> ⲁϥ ⲉⲛⲉⲥⲃⲁⲗ· ⲛ̅ⲑⲉ ⲛ̅ⲟⲩⲡⲁϩⲣⲉ· <text:line-break/><text:span text:style-name="T1"> </text:span><text:span text:style-name="T2">(28/12) </text:span> ϫⲉⲕⲁⲁⲥ ⲉⲥⲛⲁⲛⲁⲩ ⲉⲃⲟⲗ· ⲛ̅‐ <text:line-break/><text:span text:style-name="T1"> </text:span><text:span text:style-name="T2">(28/13) </text:span> ⲧⲉⲡⲉⲥⲟⲩⲟⲉⲓⲛ ϩⲱⲡ’ ⲛ̅ⲛ̅ⲡⲟ‐ <text:line-break/><text:span text:style-name="T1"> </text:span><text:span text:style-name="T2">(28/14) </text:span> ⲗⲉⲙⲟⲥ ⲉⲧⲣ̅ⲡⲟⲗⲉⲙⲉⲓ ⲛⲙ̅‐ <text:line-break/><text:span text:style-name="T1"> </text:span><text:span text:style-name="T2">(28/15) </text:span> ⲙⲁⲥ· ⲛ̅ⲥⲁⲁⲩ ⲛ̅ⲃⲗ̅ⲗⲉ ⲛ̅ϩⲣⲁⲓ̈ ϩⲛ̅ <text:line-break/><text:span text:style-name="T1"> </text:span><text:span text:style-name="T2">(28/16) </text:span> ⲡⲉⲥⲟⲩⲟⲉⲓⲛ· ⲛ̅ⲥⲟⲧⲡⲟⲩ ⲉ‐ <text:line-break/><text:span text:style-name="T1"> </text:span><text:span text:style-name="T2">(28/17) </text:span> ϩⲟⲩⲛ ⲛ̅ϩⲣⲁⲓ̈ ϩⲛ̅ ⲧⲉⲥⲡⲁⲣⲟⲩⲥⲓⲁ· <text:line-break/><text:span text:style-name="T1"> </text:span><text:span text:style-name="T2">(28/18) </text:span> ⲛ̅ⲥⲑⲓⲟⲟⲩ ⲉϩⲣⲁⲓ̈ ϩⲛ̅ ⲟⲩⲙⲛ̅ⲧ’ⲁⲧ’ <text:line-break/><text:span text:style-name="T1"> </text:span><text:span text:style-name="T2">(28/19) </text:span> {ϩ̅ⲓ}ⲛⲏⲃ· ⲛ̅ⲥⲣ̅ⲡⲁⲣϩⲏⲥⲓⲁⲍⲉ ⲙ̅ⲙⲟⲥ <text:line-break/><text:span text:style-name="T1"> </text:span><text:span text:style-name="T2">(28/20) </text:span> ϩⲙ̅ ⲡⲉⲥⲕⲣⲁⲧⲟⲥ· ⲁⲩⲱ ϩⲛ̅ ⲧⲉⲥ‐ <text:line-break/><text:span text:style-name="T1"> </text:span><text:span text:style-name="T2">(28/21) </text:span> ϭⲣⲏⲡⲉ· ⲉⲣⲉⲛⲉⲥϫⲁϫⲉ ϭⲁϣⲧ̅’ <text:line-break/><text:span text:style-name="T1"> </text:span><text:span text:style-name="T2">(28/22) </text:span> ⲛ̅ⲥⲱⲥ ⲉⲩϫⲓ ϣⲓⲡⲉ· ⲉⲥⲡⲏⲧ’ <text:line-break/><text:span text:style-name="T1"> </text:span><text:span text:style-name="T2">(28/23) </text:span> ⲉⲡⲥⲁⲛⲧⲡⲉ ⲉϩⲟⲩⲛ ⲉⲡⲉⲥⲁϩⲟ· <text:line-break/><text:span text:style-name="T1"> </text:span><text:span text:style-name="T2">(28/24) </text:span> ⲡⲁⲓ̈ ⲉⲧⲉ ⲡⲉⲥⲛⲟⲩⲥ ϣⲟⲟⲡ’ <text:line-break/><text:span text:style-name="T1"> </text:span><text:span text:style-name="T2">(28/25) </text:span> ⲛ̅ϩⲣⲁⲓ̈ ⲛ̅ϩⲏⲧϥ̅· ⲁⲩⲱ ⲧⲉⲥⲁⲡⲟ‐ <text:line-break/><text:span text:style-name="T1"> </text:span><text:span text:style-name="T2">(28/26) </text:span> ⲑⲏⲕⲏ ⲉⲧⲁⲣⲉϫ· ⲉ[ⲙ]ⲡⲉⲗⲁⲁⲩ <text:line-break/><text:span text:style-name="T1"> </text:span><text:span text:style-name="T2">(28/27) </text:span> ϩⲛ̅ ⲛⲉⲛⲧⲁⲩϣⲱⲡⲉ ⲁⲙⲁϩⲧⲉ <text:line-break/><text:span text:style-name="T1"> </text:span><text:span text:style-name="T2">(28/28) </text:span> ⲙ̅ⲙⲟⲥ· ⲟⲩⲇⲉ ⲙ̅ⲡⲉⲥϫⲓ ⲛ̅ⲟⲩ‐ <text:line-break/><text:span text:style-name="T1"> </text:span><text:span text:style-name="T2">(28/29) </text:span> ϣⲙ̅ⲙⲟ ⲉϩⲟⲩⲛ ⲉⲡⲉⲥⲏⲉⲓ· <text:line-break/><text:span text:style-name="T1"> </text:span><text:span text:style-name="T2">(28/30) </text:span> ϫⲉ ⲛⲁϣⲱⲟⲩ ⲅⲁⲣ ⲛ̅ϭⲓ ⲛⲉⲥ‐ <text:line-break/><text:span text:style-name="T1"> </text:span><text:span text:style-name="T2">(28/31) </text:span> ⲙⲉⲥϩⲛ̅ⲏⲉⲓ ⲉⲩϯ ⲟⲩⲃⲏⲥ ⲙ̅‐ <text:line-break/><text:span text:style-name="T1"> </text:span><text:span text:style-name="T2">(28/32) </text:span> ⲡⲉϩⲟⲟⲩ· ⲁⲩⲱ ⲧⲉⲩϣⲏ· <text:line-break/><text:span text:style-name="T1"> </text:span><text:span text:style-name="T2">(28/33) </text:span> ⲉⲙⲛ̅ⲧⲁⲩ ⲙ̅ⲙⲁⲩ ⲙ̅ⲡⲉⲙⲧⲟⲛ <text:line-break/><text:span text:style-name="T1"> </text:span><text:span text:style-name="T2">(29/1) </text:span> ⲙ̅ⲡ̣ⲉϩⲟ̣[ⲟ]ⲩ̣ ⲟ̣[ⲩ]ⲧ̣ⲉ ⲧⲉⲩϣ̣ⲏ· <text:line-break/><text:span text:style-name="T1"> </text:span><text:span text:style-name="T2">(29/2) </text:span> ϫⲉ̣ ⲧⲟⲩⲉⲡⲓⲑⲩⲙⲉⲓⲁ ⲅⲁ̣[ⲣ] ⲥ̣ⲙ̣ⲟⲩ‐ <text:line-break/><text:span text:style-name="T1"> </text:span><text:span text:style-name="T2">(29/3) </text:span> ⲗϩ̅ ⲙ̅ⲙⲟⲟⲩ· ⲉⲧⲃⲉ ⲡⲁⲓ̈ [ϭ]ⲉ ⲉⲛϩ̣ⲓ̣† <text:line-break/><text:span text:style-name="T1"> </text:span><text:span text:style-name="T2">(29/4) </text:span> ⲛⲏⲃ ⲁⲛ· ⲟⲩⲇⲉ ⲉⲛⲟⲃⲉϣ ⲁⲛ̣ [ⲉⲛ] <text:line-break/><text:span text:style-name="T1"> </text:span><text:span text:style-name="T2">(29/5) </text:span> ϣⲛⲏⲟⲩ ⲉⲧ’ⲥⲏⲣ ⲉⲃⲟⲗ ϩⲛ̅ ⲟⲩ‐ <text:line-break/><text:span text:style-name="T1"> </text:span><text:span text:style-name="T2">(29/6) </text:span> ϩⲱⲡ’· ⲉⲩϭⲁⲣⲉϭ ⲉⲣⲟⲛ ⲉⲣⲱϩⲧ̅’ <text:line-break/><text:span text:style-name="T1"> </text:span><text:span text:style-name="T2">(29/7) </text:span> ⲙ̅ⲙⲟⲛ· ⲉⲩϣⲁⲛⲣⲁϩⲧⲛ̅ ⲅⲁⲣ ϩⲛ̅ <text:line-break/><text:span text:style-name="T1"> </text:span><text:span text:style-name="T2">(29/8) </text:span> ⲟ̣[ⲩ]ϣⲛⲉ ⲟⲩⲱⲧ’· ϥⲛⲁⲥⲁϩⲡⲛ̅ <text:line-break/><text:span text:style-name="T1"> </text:span><text:span text:style-name="T2">(29/9) </text:span> ⲉ̣[ϩⲣ]ⲁⲓ̈ ϩⲛ̅ ⲣⲱϥ· ⲉⲣⲉⲡⲙⲟⲟⲩ ⲥⲱⲕ <text:line-break/><text:span text:style-name="T1"> </text:span><text:span text:style-name="T2">(29/10) </text:span> ⲉ[ϫ]ⲱⲛ ⲉϥϯ ⲉϩⲣⲁⲛ· ⲁⲩⲱ ⲥⲉⲛⲁ <text:line-break/><text:span text:style-name="T1"> </text:span><text:span text:style-name="T2">(29/11) </text:span> ϫⲓⲧⲛ̅ ⲉⲡⲓⲧⲛ̅ ⲉⲧⲁⲃⲱ· ⲁⲩⲱ ⲛ̅ⲧⲛ̅ <text:line-break/><text:span text:style-name="T1"> </text:span><text:span text:style-name="T2">(29/12) </text:span> ⲛⲁϣϭⲙ̅ϭⲁⲙ ⲁⲛ ⲛ̅{ⲉ̅ⲓ} ⲉϩⲣⲁⲓ̈ ⲛ̅ϩⲏ‐ <text:line-break/><text:soft-page-break/><text:span text:style-name="T1"> </text:span><text:span text:style-name="T2">(29/13) </text:span> ⲧⲥ̅· ϫⲉ ⲙ̅ⲙⲟⲩⲉⲓⲟⲟⲩⲉ ⲥⲉϫⲟⲥⲉ <text:line-break/><text:span text:style-name="T1"> </text:span><text:span text:style-name="T2">(29/14) </text:span> ⲉϫⲱⲛ· ⲉⲩϣⲟⲩⲟ ϫⲓⲛ ⲧⲡⲉ ϣⲁ‐ <text:line-break/><text:span text:style-name="T1"> </text:span><text:span text:style-name="T2">(29/15) </text:span> ⲡⲓⲧⲛ̅ ⲉⲩⲱⲙⲥ̅ ⲙ̅ⲡⲉⲛϩⲏⲧ’ ϩⲣⲁⲓ̈ <text:line-break/><text:span text:style-name="T1"> </text:span><text:span text:style-name="T2">(29/16) </text:span> ϩⲙ̅ ⲡⲟⲙⲉ ⲛ̅ⲧⲗⲁⲉⲓϩⲉ· ⲁⲩⲱ ⲧⲛ̅‐ <text:line-break/><text:span text:style-name="T1"> </text:span><text:span text:style-name="T2">(29/17) </text:span> ⲛⲁϣⲣ̅ ⲃⲟⲗ ⲁⲛ ⲛ̅ⲧⲟⲟⲧⲟⲩ· ϩⲉⲛ‐ <text:line-break/><text:span text:style-name="T1"> </text:span><text:span text:style-name="T2">(29/18) </text:span> ⲟⲩⲁⲙ ⲣⲱⲙⲉ ⲅⲁⲣ ⲛⲉⲧⲛⲁϭⲱⲡⲉ <text:line-break/><text:span text:style-name="T1"> </text:span><text:span text:style-name="T2">(29/19) </text:span> ⲙ̅ⲙⲟⲛ ⲛ̅ⲥⲉⲟⲙⲕⲛ̅ ⲉⲩⲣⲁϣⲉ <text:line-break/><text:span text:style-name="T1"> </text:span><text:span text:style-name="T2">(29/20) </text:span> ⲛ̅ⲑⲉ ⲛ̅ⲟⲩϩⲁⲗⲓⲉⲩⲥ ⲉϥⲛⲉϫ‐ <text:line-break/><text:span text:style-name="T1"> </text:span><text:span text:style-name="T2">(29/21) </text:span> ⲟⲉⲓⲙ ⲉⲡⲙⲟⲟⲩ· ϣⲁϥⲛⲟⲩϫⲉ <text:line-break/><text:span text:style-name="T1"> </text:span><text:span text:style-name="T2">(29/22) </text:span> ⲅⲁⲣ ⲛ̅ϩⲁϩ ⲙ̅ⲙⲓⲛⲉ ⲛ̅ⲧⲣⲟⲫⲏ <text:line-break/><text:span text:style-name="T1"> </text:span><text:span text:style-name="T2">(29/23) </text:span> ⲉⲡⲙⲟⲟⲩ· ϫⲉ ⲡⲟⲩⲁ ⲅⲁⲣ ⲡⲟⲩⲁ‐ <text:line-break/><text:span text:style-name="T1"> </text:span><text:span text:style-name="T2">(29/24) </text:span> ⲛ̅ⲛ̅ⲧⲃ̅ⲧ’ ⲟⲩⲛ̅ⲧⲁϥ ⲙ̅ⲙⲁⲩ ⲛ̅ⲧⲉϥ <text:line-break/><text:span text:style-name="T1"> </text:span><text:span text:style-name="T2">(29/25) </text:span> ⲧⲣⲟⲫⲏ· ⲉϣⲁϥϣⲱⲗⲙ̅ ⲉⲣⲟⲥ <text:line-break/><text:span text:style-name="T1"> </text:span><text:span text:style-name="T2">(29/26) </text:span> ⲛ̅ϥⲡⲱⲧ’ ⲛ̅ⲥⲁ ⲡⲉⲥⲥⲧⲟⲉⲓ· <text:line-break/><text:span text:style-name="T1"> </text:span><text:span text:style-name="T2">(29/27) </text:span> ϩⲟⲧⲁⲛ ϭⲉ ⲉϥϣⲁⲛⲟⲩⲟⲙⲥ̅ <text:line-break/><text:span text:style-name="T1"> </text:span><text:span text:style-name="T2">(29/28) </text:span> ϣⲁⲥϭⲱⲡⲉ ⲙ̅ⲙⲟϥ ⲛ̅ϭⲓ ⲧⲟⲉⲓⲙ <text:line-break/><text:span text:style-name="T1"> </text:span><text:span text:style-name="T2">(29/29) </text:span> ⲉⲑⲏⲡ’ ⲙ̅ⲡⲥⲁⲛϩⲟⲩⲛ ⲛ̅ⲧ’ⲧⲣⲟ‐ <text:line-break/><text:span text:style-name="T1"> </text:span><text:span text:style-name="T2">(29/30) </text:span> ⲫⲏ ⲛ̅ⲥⲉⲓⲛⲉ ⲙ̅ⲙⲟϥ ⲉϩⲣⲁⲓ̈ ⲛ̅‐ <text:line-break/><text:span text:style-name="T1"> </text:span><text:span text:style-name="T2">(29/31) </text:span> ⲃⲓⲁ ⲉⲃⲟⲗ ϩⲛ̅ ϩⲉⲛⲙⲟⲟⲩ ⲉⲛⲁ <text:line-break/><text:span text:style-name="T1"> </text:span><text:span text:style-name="T2">(29/32) </text:span> ϣⲱⲟⲩ· ⲉⲙⲛ ϣϭⲟⲙ ϭⲉ ⲡⲉ ⲛ̅‐ <text:line-break/><text:span text:style-name="T1"> </text:span><text:span text:style-name="T2">(29/33) </text:span> ⲗⲁⲁⲩ ⲛ̅ⲣⲱⲙⲉ ⲉⲁⲙⲁϩⲧⲉ ⲙ̅ⲡⲧⲃ̅ⲧ’ <text:line-break/><text:span text:style-name="T1"> </text:span><text:span text:style-name="T2">(29/34) </text:span> ⲉⲧⲙ̅ⲙⲁⲩ ⲛ̅ϩⲣⲁⲓ̈ ϩⲛ̅ ⲙ̅ⲙⲟⲩⲉⲓⲟⲟⲩⲉ <text:line-break/><text:span text:style-name="T1"> </text:span><text:span text:style-name="T2">(30/1) </text:span> ⲉ̣ⲧⲛⲁϣⲱⲟⲩ· ⲉⲓ ⲙ[ⲏ]ⲧⲓ ⲉⲡⲉⲕⲣⲟϥ <text:line-break/><text:span text:style-name="T1"> </text:span><text:span text:style-name="T2">(30/2) </text:span> ⲉⲛⲧⲁϥⲁⲁϥ [ⲛ̅ϭ]ⲓ ⲡϩⲁⲗⲓⲉⲩⲥ· ⲛ̅ⲧⲗⲁ <text:line-break/><text:span text:style-name="T1"> </text:span><text:span text:style-name="T2">(30/3) </text:span> ⲉⲓϭ̣ⲉ̣ ⲛ̅ⲧⲣⲟⲫⲏ ⲁⲫⲉⲓⲛⲉ ⲙ̅ⲡⲧⲃ̅ⲧ’ <text:line-break/><text:span text:style-name="T1"> </text:span><text:span text:style-name="T2">(30/4) </text:span> ⲉϩⲣⲁ[ⲓ̈] ϩ̣ⲛ̅ ⲧⲟⲉⲓⲙʹ· ⲧⲁⲓ̈ ϩⲱⲱⲥ ⲧⲉ <text:line-break/><text:span text:style-name="T1"> </text:span><text:span text:style-name="T2">(30/5) </text:span> ⲑⲉ ⲉⲛϣⲟⲟⲡ’ ⲛ̅ϩⲣⲁⲓ̈ ϩⲙ̅ ⲡⲉⲓ̈ⲕⲟⲥⲙⲟⲥ <text:line-break/><text:span text:style-name="T1"> </text:span><text:span text:style-name="T2">(30/6) </text:span> [ⲛ̅]ⲑⲉ ⲛ̅ⲛ̅ⲧⲃ̅ⲧ’· ⲡⲁⲛⲧⲓⲕⲉⲓⲙⲉ <text:line-break/><text:span text:style-name="T1"> </text:span><text:span text:style-name="T2">(30/7) </text:span> ⲛⲟⲥ ⲇⲉ ⲉϥⲣⲟⲉⲓⲥ ⲟⲩⲃⲏⲛ ⲉϥϭⲟ‐ <text:line-break/><text:span text:style-name="T1"> </text:span><text:span text:style-name="T2">(30/8) </text:span> ⲣⲉϭ ⲉⲣⲟⲛ· ⲛ̅ⲑⲉ ⲛ̅ⲟⲩϩⲉⲗⲓ̣ⲉⲩⲥ <text:line-break/><text:span text:style-name="T1"> </text:span><text:span text:style-name="T2">(30/9) </text:span> ⲉϥⲟⲩⲱϣⲉ ⲉϭⲟⲡⲛ̅ ⲉϥⲣ[ⲁ]ϣ̣ⲉ <text:line-break/><text:span text:style-name="T1"> </text:span><text:span text:style-name="T2">(30/10) </text:span> ϫⲉⲕⲁⲁⲥ ⲉϥⲁⲟⲙⲕⲛ̅· ϣ[ⲁϥ]ⲛ̣ⲟ̣[ⲩϫⲉ] <text:line-break/><text:span text:style-name="T1"> </text:span><text:span text:style-name="T2">(30/11) </text:span> ⲅⲁⲣ ⲛ̅ϩⲁϩ ⲛ̅ⲧⲣⲟⲫⲏ ⲙ̅ⲡⲉⲙⲧⲟ <text:line-break/><text:span text:style-name="T1"> </text:span><text:span text:style-name="T2">(30/12) </text:span> ⲉⲃⲟⲗ ⲛ̅ⲛⲉⲛⲃⲁⲗ ⲉⲛⲁⲡⲉⲓ̈ⲕⲟ <text:line-break/><text:span text:style-name="T1"> </text:span><text:span text:style-name="T2">(30/13) </text:span> ⲥⲙⲟⲥ ⲛⲉ· ⲉϥⲟⲩⲱϣⲉ ⲉⲧⲣⲉⲛ <text:line-break/><text:span text:style-name="T1"> </text:span><text:span text:style-name="T2">(30/14) </text:span> ⲣ̅ⲉⲡⲓⲑⲩⲙⲉⲓ· ⲉⲟⲩ{ⲉ̅ⲓ} ⲙ̅ⲙⲟⲟⲩ <text:line-break/><text:span text:style-name="T1"> </text:span><text:span text:style-name="T2">(30/15) </text:span> ⲛ̅ⲧⲛ̅ϫⲓ ϯⲡⲉ ⲙ̅ⲙⲁⲧⲉ ⲛ̅ⲟⲩ‐ <text:line-break/><text:span text:style-name="T1"> </text:span><text:span text:style-name="T2">(30/16) </text:span> ⲕⲟⲩⲉⲓ ⲛ̅ϥϭⲱⲡⲉ ⲙ̅ⲙⲟⲛ ⲛ̅ϩⲣⲁⲓⲫ̈ <text:line-break/><text:span text:style-name="T1"> </text:span><text:span text:style-name="T2">(30/17) </text:span> ϩⲛ̅ ⲧⲉϥⲡⲁϩⲣⲉ ⲉⲑⲏⲡ’· ⲛ̅ϥⲉⲓⲛⲉ <text:line-break/><text:span text:style-name="T1"> </text:span><text:span text:style-name="T2">(30/18) </text:span> ⲙ̅ⲙⲟⲛ ⲉⲃⲟⲗ ϩⲛ̅ ⲟⲩⲙⲛ̅ⲧ’ⲉⲗⲉⲩ‐ <text:line-break/><text:span text:style-name="T1"> </text:span><text:span text:style-name="T2">(30/19) </text:span> ⲑⲉⲣⲟⲥ· ⲛ̅ϥϫⲓⲧⲛ̅ ⲉϩⲟⲩⲛ ⲉⲩ‐ <text:line-break/><text:span text:style-name="T1"> </text:span><text:span text:style-name="T2">(30/20) </text:span> ⲙⲛ̅ⲧ’ϩⲙ̅ϩⲁⲗ· ⲉϥϣⲁⲛⲣⲁϩⲧⲛ̅ ⲅⲁⲣ <text:line-break/><text:span text:style-name="T1"> </text:span><text:span text:style-name="T2">(30/21) </text:span> ⲛ̅ϩⲣⲁⲓ̈ ϩⲛ̅ ⲟⲩⲧⲣⲟⲫⲏ ⲟⲩⲱⲧ’· <text:line-break/><text:span text:style-name="T1"> </text:span><text:span text:style-name="T2">(30/22) </text:span> ⲧⲁⲛⲁⲅ’ⲕⲏ ⲅⲁⲣ ⲧ[ⲣ]ⲉ ⲉⲧⲣⲉ[ⲛ]ⲣ̅‐ <text:line-break/><text:span text:style-name="T1"> </text:span><text:span text:style-name="T2">(30/23) </text:span> ⲉⲡⲓⲑⲩⲙⲉⲓ ⲉⲡⲕⲉⲥⲉⲉⲡⲉ· <text:line-break/><text:span text:style-name="T1"> </text:span><text:span text:style-name="T2">(30/24) </text:span> ⲉⲑⲁⲏ ϭⲉ ϣⲁⲣⲉⲛⲁⲓ̈ ⲛ̅ⲧⲉⲓ̈ϩⲉ <text:line-break/><text:span text:style-name="T1"> </text:span><text:span text:style-name="T2">(30/25) </text:span> ϣⲱⲡⲉ ⲛ̅ⲧⲣⲟⲫⲏ ⲙ̅ⲡⲙⲟⲩ· <text:line-break/><text:soft-page-break/><text:span text:style-name="T1"> </text:span><text:span text:style-name="T2">(30/26) </text:span> ⲛⲁⲓ̈ ⲇⲉ ⲛⲉ ⲛ̅ⲧⲣⲟⲫⲏ ⲉϣⲁϥ <text:line-break/><text:span text:style-name="T1"> </text:span><text:span text:style-name="T2">(30/27) </text:span> ϭⲱⲣϭ̅ ⲉⲣⲟⲛ ⲛ̅ϩⲏⲧⲟⲩ ⲛ̅ϭⲓ ⲡⲇⲓ‐ <text:line-break/><text:span text:style-name="T1"> </text:span><text:span text:style-name="T2">(30/28) </text:span> ⲁⲃⲟⲗⲟⲥ· ϣⲟⲣⲡ̅’ ⲙⲉⲛ ϣⲁϥ <text:line-break/><text:span text:style-name="T1"> </text:span><text:span text:style-name="T2">(30/29) </text:span> ⲛⲟⲩϫⲉ ⲛ̅ⲟⲩⲗⲩⲡⲏ ⲉⲡⲉⲕ <text:line-break/><text:span text:style-name="T1"> </text:span><text:span text:style-name="T2">(30/30) </text:span> ϩⲏⲧ’ ϣⲁⲛⲧⲉⲕⲙ̅ⲕⲁϩ ⲛ̅ϩⲏⲧ’· <text:line-break/><text:span text:style-name="T1"> </text:span><text:span text:style-name="T2">(30/31) </text:span> ⲉⲧⲃⲉ ⲟⲩⲕⲟⲩⲉⲓ ⲛ̅ϩⲱⲃ ⲛ̅ⲧⲉ <text:line-break/><text:span text:style-name="T1"> </text:span><text:span text:style-name="T2">(30/32) </text:span> ⲡⲉⲉⲓⲃⲓⲟⲥ ⲛ̅ϥϭⲱⲡⲉ ⲙ̅ⲙⲟ[ⲕ] <text:line-break/><text:span text:style-name="T1"> </text:span><text:span text:style-name="T2">(30/33) </text:span> ϩⲣⲁⲓ̈ ϩⲛ̅ ⲛⲉϥⲡⲁϩⲣⲉ· ⲁⲩⲱ <text:line-break/><text:span text:style-name="T1"> </text:span><text:span text:style-name="T2">(30/34) </text:span> ⲙⲛ̅ⲛ̅ⲥⲟⲥ ⲧⲉⲡⲓⲑⲩⲙⲓⲁ ⲛ̅‐ <text:line-break/><text:span text:style-name="T1"> </text:span><text:span text:style-name="T2">(30/35) </text:span> ⲟⲩϣⲧⲏⲛ ⲛ̅ⲕϣⲟⲩϣⲟⲩ <text:line-break/><text:span text:style-name="T1"> </text:span><text:span text:style-name="T2">(31/1) </text:span> ⲙ̅ⲙⲟⲕ ⲛ̅ϩⲏⲧⲥ̅· ⲁⲩⲱ ⲟⲩⲙⲛ̅ⲧ’‐ <text:line-break/><text:span text:style-name="T1"> </text:span><text:span text:style-name="T2">(31/2) </text:span> ⲙⲁⲉⲓ ϩⲟⲙⲛ̅ⲧ’· ⲟⲩϣⲟⲩϣⲟⲩ· <text:line-break/><text:span text:style-name="T1"> </text:span><text:span text:style-name="T2">(31/3) </text:span> ⲟⲩϫⲓⲥⲉ ⲛ̅ϩⲏⲧ’· ⲟⲩⲕⲱϩ ⲉϥ‐ <text:line-break/><text:span text:style-name="T1"> </text:span><text:span text:style-name="T2">(31/4) </text:span> ⲕⲱϩ ⲉⲕⲉⲕⲱϩ· ⲟⲩⲥⲁⲉⲓⲉ ⲛ̅‐ <text:line-break/><text:span text:style-name="T1"> </text:span><text:span text:style-name="T2">(31/5) </text:span> ⲥⲱⲙⲁ· ⲟⲩⲙⲛ̅ⲧ’ϩⲁⲩⲣⲉ ⲣⲱ̣ⲙ[ⲉ·] <text:line-break/><text:span text:style-name="T1"> </text:span><text:span text:style-name="T2">(31/6) </text:span> ⲛⲁⲓ̈ ⲧⲏⲣⲟⲩ ⲡⲟⲩⲛⲟϭ ⲧⲉ ⲧⲙⲛ̅ⲧ’‐ <text:line-break/><text:span text:style-name="T1"> </text:span><text:span text:style-name="T2">(31/7) </text:span> ⲁⲧ’ⲥⲟⲟⲩⲛ· ⲁⲩⲱ ⲧⲙⲛ̅ⲧ’ⲁⲧ’{ϩ̅ⲓ}‐ <text:line-break/><text:span text:style-name="T1"> </text:span><text:span text:style-name="T2">(31/8) </text:span> ⲥⲉ· ⲛⲁⲓ̈ ϭⲉ ⲧⲏⲣⲟⲩ ⲛ̅ⲧⲉⲉⲓϩⲉ <text:line-break/><text:span text:style-name="T1"> </text:span><text:span text:style-name="T2">(31/9) </text:span> ϣ[ⲁ]ⲣⲉⲡⲁⲛⲧⲓⲕⲉⲓⲙⲉⲛⲟⲥ ϭⲁⲣ <text:line-break/><text:span text:style-name="T1"> </text:span><text:span text:style-name="T2">(31/10) </text:span> ϭⲟ[ⲩ] ⲕⲁⲗⲱⲥ· ⲛ̅ϥⲥⲟⲣⲟⲩ ⲉⲃⲟⲗ <text:line-break/><text:span text:style-name="T1"> </text:span><text:span text:style-name="T2">(31/11) </text:span> ⲙ̅ⲡⲙ̅ⲧⲟ ⲉⲃⲟⲗ ⲙ̅ⲡⲥⲱⲙⲁ· ⲉϥ‐ <text:line-break/><text:span text:style-name="T1"> </text:span><text:span text:style-name="T2">(31/12) </text:span> ⲟⲩⲱϣⲉ ⲉⲧⲣⲉⲫⲏⲧ’ ⲛ̅ⲧⲯⲩ‐ <text:line-break/><text:span text:style-name="T1"> </text:span><text:span text:style-name="T2">(31/13) </text:span> ⲭⲏ ⲣⲉⲕⲧⲥ̅ ⲉϫⲛ̅ ⲟⲩⲁ ⲙ̅ⲙⲟⲟⲩ <text:line-break/><text:span text:style-name="T1"> </text:span><text:span text:style-name="T2">(31/14) </text:span> ⲛ̅ϥϫⲟⲗⲕⲥ̅· ⲛ̅ⲑⲉ ⲛ̅ⲟⲩⲟⲉⲓⲙ <text:line-break/><text:span text:style-name="T1"> </text:span><text:span text:style-name="T2">(31/15) </text:span> ⲉϥⲥⲱⲕ ⲙ̅ⲙⲟⲥ ⲛ̅ⲃⲓⲁ ϩⲛ̅ ⲟⲩ‐ <text:line-break/><text:span text:style-name="T1"> </text:span><text:span text:style-name="T2">(31/16) </text:span> ⲙⲛ̅ⲧ’ⲁⲧ’ⲥⲟⲟⲩⲛ· ⲉϥⲣ̅ⲁⲡⲁⲧⲁ <text:line-break/><text:span text:style-name="T1"> </text:span><text:span text:style-name="T2">(31/17) </text:span> ⲙ̅ⲙⲟⲥ ϣⲁⲛⲧⲥ̅ⲱ‐ ⲙ̅ⲡⲕⲁⲕⲟⲛ· <text:line-break/><text:span text:style-name="T1"> </text:span><text:span text:style-name="T2">(31/18) </text:span> ⲛ̅ⲥⲙⲓⲥⲉ ⲛ̅ϩⲉⲛⲕⲁⲣⲡⲟⲥ ⲛ̅ⲑⲩ‐ <text:line-break/><text:span text:style-name="T1"> </text:span><text:span text:style-name="T2">(31/19) </text:span> ⲗⲏ· ⲛ̅ⲥⲣ̅ⲡⲟⲗⲓⲧⲉⲩⲉⲥⲑⲁⲓ <text:line-break/><text:span text:style-name="T1"> </text:span><text:span text:style-name="T2">(31/20) </text:span> ϩⲙ̅ ⲡϫⲱϩⲙ̅ ⲉⲥⲡⲏⲧ’ ⲛ̅ⲥⲁ ϩⲁϩ <text:line-break/><text:span text:style-name="T1"> </text:span><text:span text:style-name="T2">(31/21) </text:span> ⲛ̅ⲛⲉⲡⲓⲑⲩⲙⲓⲁ· ϩⲉⲛⲙⲛ̅ⲧ’‐ <text:line-break/><text:span text:style-name="T1"> </text:span><text:span text:style-name="T2">(31/22) </text:span> ⲙⲁⲉⲓ ⲧⲟ ⲛ̅ϩⲟⲩⲟ· ⲉⲣⲉⲡϩⲗⲁϭ <text:line-break/><text:span text:style-name="T1"> </text:span><text:span text:style-name="T2">(31/23) </text:span> ⲛ̅ⲥⲁⲣⲕⲓⲕⲟⲛ ⲥⲱⲕ’ ⲙ̅ⲙⲟⲥ ϩⲛ̅ <text:line-break/><text:span text:style-name="T1"> </text:span><text:span text:style-name="T2">(31/24) </text:span> ⲟⲩⲙⲛ̅ⲧ’ⲁⲧ’ⲥⲟⲟⲩⲛ· ⲧⲯⲩⲭⲏ <text:line-break/><text:span text:style-name="T1"> </text:span><text:span text:style-name="T2">(31/25) </text:span> ⲇⲉ ⲛ̅ⲧⲟⲥ ⲛ̅ⲧⲁⲥϫⲓ ϯⲡⲉ ⲛ̅ⲛⲁⲓ̈· <text:line-break/><text:span text:style-name="T1"> </text:span><text:span text:style-name="T2">(31/26) </text:span> ⲁⲥⲙ̅ⲙⲉ ϫⲉ ϩⲉⲛⲡⲁⲑⲟⲥ ⲉⲩ‐ <text:line-break/><text:span text:style-name="T1"> </text:span><text:span text:style-name="T2">(31/27) </text:span> ϩⲟⲗⲉϭ ⲛⲉ ⲡⲣⲟⲥ ⲟⲩⲟⲉⲓϣ· <text:line-break/><text:span text:style-name="T1"> </text:span><text:span text:style-name="T2">(31/28) </text:span> ⲛⲉⲁⲥϫⲓ ⲥⲟⲟⲩⲛ ⲉⲧⲕⲁϭⲓⲁ <text:line-break/><text:span text:style-name="T1"> </text:span><text:span text:style-name="T2">(31/29) </text:span> ⲁⲥϥⲓⲧⲥ̅ ⲉⲃⲟⲗ ⲙ̅ⲙⲟⲟⲩ· ⲁⲥ‐ <text:line-break/><text:span text:style-name="T1"> </text:span><text:span text:style-name="T2">(31/30) </text:span> ϣⲱⲡⲉ ϩⲛ̅ ⲟⲩⲡⲟⲗⲓⲧⲉⲓⲁ <text:line-break/><text:span text:style-name="T1"> </text:span><text:span text:style-name="T2">(31/31) </text:span> ⲛ̅ⲃⲣ̅ⲣⲉ· ⲙⲛ̅ⲛ̅ⲥⲱⲥ ϣⲁⲥ <text:line-break/><text:span text:style-name="T1"> </text:span><text:span text:style-name="T2">(31/32) </text:span> ⲕⲁⲧⲁⲫⲣⲟⲛⲓ ⲙ̅ⲡⲉⲉⲓⲃⲓⲟⲥ <text:line-break/><text:span text:style-name="T1"> </text:span><text:span text:style-name="T2">(31/33) </text:span> ⲉⲩⲡⲣⲟⲥ ⲟⲩⲟⲉⲓϣ ⲡⲉ· ⲛ̅ⲥ <text:line-break/><text:span text:style-name="T1"> </text:span><text:span text:style-name="T2">(31/34) </text:span> ϣⲓⲛⲉ ⲛ̅ⲥⲁ ⲛⲓⲧⲣⲟⲫⲏ ⲉⲧⲛⲁ <text:line-break/><text:span text:style-name="T1"> </text:span><text:span text:style-name="T2">(31/35) </text:span> ϫⲓⲧⲥ̅ ⲉϩⲟⲩⲛ ⲉⲡⲱⲛϩ̅· <text:line-break/><text:span text:style-name="T1"> </text:span><text:span text:style-name="T2">(32/1) </text:span> ⲛ̣̅ⲥⲕⲱ ⲛ̅ⲥⲱⲥ ⲛ̅ⲛⲓⲧⲣⲟⲫⲏ ⲛ̅ⲕⲣⲟϥ <text:line-break/><text:span text:style-name="T1"> </text:span><text:span text:style-name="T2">(32/2) </text:span> ⲛ̅ⲥϫⲓ ⲥⲟⲟⲩⲛ ⲉⲡⲉⲥⲟⲩⲟⲉⲓⲛ· ⲉⲥ <text:line-break/><text:soft-page-break/><text:span text:style-name="T1"> </text:span><text:span text:style-name="T2">(32/3) </text:span> ⲙⲟⲟϣⲉ ⲉⲥⲕⲏⲕ ⲁϩⲏⲟⲩ ⲙ̅ⲡⲉⲓ̈ <text:line-break/><text:span text:style-name="T1"> </text:span><text:span text:style-name="T2">(32/4) </text:span> ⲕⲟⲥⲙⲟⲥ· ⲉⲣⲉⲧⲉⲥϩⲃ̅ⲥⲱ ⲙ̅ⲙⲉ <text:line-break/><text:span text:style-name="T1"> </text:span><text:span text:style-name="T2">(32/5) </text:span> ϭ̣ⲟⲗⲉ ⲙ̅ⲙⲟⲥ ⲙ̅ⲡⲉⲥⲥⲁⲛϩⲟⲩⲛ· <text:line-break/><text:span text:style-name="T1"> </text:span><text:span text:style-name="T2">(32/6) </text:span> ⲉⲣⲉⲡⲉⲥϫⲓϩⲃⲟⲟⲥ ⲛ̅ϣⲉⲗⲉⲉⲧ’ <text:line-break/><text:span text:style-name="T1"> </text:span><text:span text:style-name="T2">(32/7) </text:span> ⲧⲟ {ϩ̅ⲓ}ⲱⲱⲥ ϩⲛ̅ ⲟⲩⲙⲛ̅ⲧ’ⲥⲁⲉⲓⲉ ⲛ̅‐ <text:line-break/><text:span text:style-name="T1"> </text:span><text:span text:style-name="T2">(32/8) </text:span> ϩⲏⲧ’· ϩⲛ̅ ⲟⲩⲗⲁϩⲗⲉϩ ⲁⲛ ⲛ̅ⲥⲁⲣⲁⲝ· <text:line-break/><text:span text:style-name="T1"> </text:span><text:span text:style-name="T2">(32/9) </text:span> ⲛ̅ⲥϫⲓ ⲥⲟⲟⲩⲛ ⲉⲡⲉⲥⲃⲁⲑⲟ̣ⲥ ⲛ̅ⲥ‐ <text:line-break/><text:span text:style-name="T1"> </text:span><text:span text:style-name="T2">(32/10) </text:span> ⲡⲱⲧ’ ⲉϩⲟⲩⲛ ⲉⲧⲉⲥⲁⲩⲗⲏ̣· ⲉⲣ[ⲉ]‐ <text:line-break/><text:span text:style-name="T1"> </text:span><text:span text:style-name="T2">(32/11) </text:span> ⲡⲉⲥⲡⲟⲓⲙⲏⲛ ⲁϩⲉⲣⲁⲧϥ̅ ⲉⲡⲣⲟ· <text:line-break/><text:span text:style-name="T1"> </text:span><text:span text:style-name="T2">(32/12) </text:span> ⲛ̅ϣⲓⲡⲉ ϭⲉ ⲧⲏⲣⲟⲩ ⲙⲛ̅ ⲛ̅ϣⲱⲥ <text:line-break/><text:span text:style-name="T1"> </text:span><text:span text:style-name="T2">(32/13) </text:span> ⲉⲛⲧⲁⲥϫⲓⲧⲟⲩ ϩⲙ̅ ⲡⲉⲓ̈ⲕⲟⲥ <text:line-break/><text:span text:style-name="T1"> </text:span><text:span text:style-name="T2">(32/14) </text:span> ⲙⲟⲥϩ ϣⲁⲥϫⲓ ⲙ̅ⲡⲟⲩⲕⲱⲃ ⲛ̅‐ <text:line-break/><text:span text:style-name="T1"> </text:span><text:span text:style-name="T2">(32/15) </text:span> ⲟⲩⲧⲃⲁ ⲛ̅ⲥⲟⲡ’ ⲛ̅ⲭⲁⲣⲓⲥ {ϩ̅ⲓ} ⲉⲟ‐ <text:line-break/><text:span text:style-name="T1"> </text:span><text:span text:style-name="T2">(32/16) </text:span> ⲟⲩ· ⲁⲥϯ ⲙ̅ⲡⲥⲱⲙⲁ ⲉⲧⲟⲟⲧ[ⲟⲩ] <text:line-break/><text:span text:style-name="T1"> </text:span><text:span text:style-name="T2">(32/17) </text:span> ⲛ̅ⲛⲉⲛⲧⲁⲩⲧⲁⲁϥ ⲛⲁⲥ ⲉⲩϫⲓ <text:line-break/><text:span text:style-name="T1"> </text:span><text:span text:style-name="T2">(32/18) </text:span> ϣⲓⲡⲉ· ⲉⲣⲉⲙ̅ⲡⲣⲁⲅⲙⲁⲧⲉⲩⲧⲏⲥ <text:line-break/><text:span text:style-name="T1"> </text:span><text:span text:style-name="T2">(32/19) </text:span> ⲛ̅ⲛ̅ⲥⲱⲙⲁ ϩⲙⲟⲟⲥ ⲉϩⲣⲁⲓ̈ ⲉⲩⲣⲓ‐ <text:line-break/><text:span text:style-name="T1"> </text:span><text:span text:style-name="T2">(32/20) </text:span> ⲙⲉ· ϫⲉ ⲙ̅ⲡⲟⲩϣϭⲙ̅ϭⲟⲙ ⲛ̅ⲣ̅‐ <text:line-break/><text:span text:style-name="T1"> </text:span><text:span text:style-name="T2">(32/21) </text:span> ⲡⲣⲁⲅⲙⲁⲧⲉⲩⲉⲥⲑⲁⲓ ⲛ̅ⲥⲁ ⲡⲓⲥⲱ‐ <text:line-break/><text:span text:style-name="T1"> </text:span><text:span text:style-name="T2">(32/22) </text:span> ⲙⲁ ⲉⲧⲙ̅ⲙⲁⲩ· ⲟⲩⲧⲉ ⲙ̅ⲡⲟⲩϭⲛ̅ <text:line-break/><text:span text:style-name="T1"> </text:span><text:span text:style-name="T2">(32/23) </text:span> ⲗⲁⲁⲩ ⲛ̅ⲉⲓⲉⲡ ϣⲱⲱⲧ’ ⲛ̅ⲥⲱϥ· <text:line-break/><text:span text:style-name="T1"> </text:span><text:span text:style-name="T2">(32/24) </text:span> ⲁⲩϣⲱⲡ’ ⲛ̅ϩⲉⲛⲛⲟϭ ⲛ̅{ϩ̅ⲓ}ⲥⲉ ϣⲁⲛ <text:line-break/><text:span text:style-name="T1"> </text:span><text:span text:style-name="T2">(32/25) </text:span> ⲧⲟⲩⲡⲗⲁⲥⲥⲉ ⲙ̅ⲡⲥⲱⲙⲁ ⲛ̅ⲧⲉ‐ <text:line-break/><text:span text:style-name="T1"> </text:span><text:span text:style-name="T2">(32/26) </text:span> ⲉⲓⲯⲩⲭⲏ· ⲉⲩⲟⲩⲱϣⲉ ⲉⲣⲱ‐ <text:line-break/><text:span text:style-name="T1"> </text:span><text:span text:style-name="T2">(32/27) </text:span> ϩⲧ̅’ ⲛ̅ⲧⲯⲩⲭⲏ ⲛ̅ⲁϩⲟⲣⲁⲧⲟⲥ ⲉϩⲣⲁⲓ̈· <text:line-break/><text:span text:style-name="T1"> </text:span><text:span text:style-name="T2">(32/28) </text:span> ⲁⲩϫⲓ ϣⲓⲡⲉ ϭⲉ ϩⲣⲁⲓ̈ ϩⲙ̅ ⲡⲟⲩ‐ <text:line-break/><text:span text:style-name="T1"> </text:span><text:span text:style-name="T2">(32/29) </text:span> ϩⲱⲃ· ⲁⲩϯ ⲟⲥⲉ ⲙ̅ⲡⲉⲛⲧⲁⲩ‐ <text:line-break/><text:span text:style-name="T1"> </text:span><text:span text:style-name="T2">(32/30) </text:span> ϣⲡ̅’ {ϩ̅ⲓ}ⲥⲉ ⲉⲣⲟϥ· ⲙ̅ⲡⲟⲩⲙ̅ⲙⲉ <text:line-break/><text:span text:style-name="T1"> </text:span><text:span text:style-name="T2">(32/31) </text:span> ϫⲉ ⲟⲩⲛ̅ⲧⲁⲥ ⲙ̅ⲙⲁⲩ ⲛ̅ⲟⲩⲥⲱ‐ <text:line-break/><text:span text:style-name="T1"> </text:span><text:span text:style-name="T2">(32/32) </text:span> ⲙⲁ ⲙ̅ⲡ̅ⲛ̅ⲁ̅ⲧⲓⲕⲟⲛ ⲛ̅ⲁϩⲟⲣⲁⲧⲟⲛ· <text:line-break/><text:span text:style-name="T1"> </text:span><text:span text:style-name="T2">(32/33) </text:span> ⲉⲩⲙⲉⲉⲩⲉ ϫⲉ ⲁⲛⲟⲛ ⲡⲉ ⲡⲉⲥ‐ <text:line-break/><text:span text:style-name="T1"> </text:span><text:span text:style-name="T2">(32/34) </text:span> ⲡⲟⲓⲙⲏⲛ ⲉⲧ’ⲙⲟⲟⲛⲉ ⲙ̅ⲙⲟⲥ· <text:line-break/><text:span text:style-name="T1"> </text:span><text:span text:style-name="T2">(32/35) </text:span> ⲙ̅ⲡⲟⲩⲙ̅ⲙⲉ ⲇⲉ ϫⲉ ⲥ̅ⲥⲟⲟⲩⲛ <text:line-break/><text:span text:style-name="T1"> </text:span><text:span text:style-name="T2">(33/1) </text:span> ⲛ̅ⲕⲉ{ϩ̅ⲓ}ⲏ ⲉⲥϩⲏⲡ’ ⲉⲣⲟⲟⲩ· ⲧⲁⲓ̈ <text:line-break/><text:span text:style-name="T1"> </text:span><text:span text:style-name="T2">(33/2) </text:span> ⲛ̅ⲧⲁⲡⲉⲥⲡⲟⲓⲙⲏⲛ ⲛ̅ⲁⲗⲏⲑⲓⲛⲟⲥ <text:line-break/><text:span text:style-name="T1"> </text:span><text:span text:style-name="T2">(33/3) </text:span> ⲧⲥⲁⲃⲟⲥ ⲉⲣⲟⲥ ϩⲛ̅ ⲟⲩⲥⲟⲟⲩⲛ· <text:line-break/><text:span text:style-name="T1"> </text:span><text:span text:style-name="T2">(33/4) </text:span> ⲛⲁⲓ̈ ⲇⲉ ⲛ̅ⲧⲟⲟⲩ ⲉⲧⲟ ⲛ̅ⲛⲁⲧⲥⲟ‐ <text:line-break/><text:span text:style-name="T1"> </text:span><text:span text:style-name="T2">(33/5) </text:span> ⲟⲩⲛ ⲉⲩϣⲓⲛⲉ ⲁⲛ ⲛ̅ⲥⲁ ⲡⲛⲟ̣ⲩ‐ <text:line-break/><text:span text:style-name="T1"> </text:span><text:span text:style-name="T2">(33/6) </text:span> ⲧⲉ· ⲟⲩⲇⲉ ⲉⲩϩⲟⲧ[ϩⲧ̅’ ⲁⲛ ⲛ̅ⲥⲁ‐ <text:line-break/><text:span text:style-name="T1"> </text:span><text:span text:style-name="T2">(33/7) </text:span> ⲡⲟⲩⲙⲁ ⲛ̅ϣⲱⲡⲉ ⲉⲧ’ϣⲟⲟⲡ’ <text:line-break/><text:span text:style-name="T1"> </text:span><text:span text:style-name="T2">(33/8) </text:span> ϩⲛ̣̅ ⲟⲩⲁⲛⲁⲡⲁⲩⲥⲓⲥ· ⲁⲗⲗⲁ ⲉⲩ‐ <text:line-break/><text:span text:style-name="T1"> </text:span><text:span text:style-name="T2">(33/9) </text:span> ⲙⲟⲟϣⲉ ϩⲛ̅ ⲟⲩⲙⲛ̅ⲧ’ⲧⲃ̅ⲛⲏ· ⲛⲁⲓ̈ <text:line-break/><text:span text:style-name="T1"> </text:span><text:span text:style-name="T2">(33/10) </text:span> ⲉⲧⲙ̅ⲙⲁⲩ ⲥⲉϩⲟⲟⲩ ⲛ̅ϩⲟⲩⲟ ⲉⲛ‐ <text:line-break/><text:span text:style-name="T1"> </text:span><text:span text:style-name="T2">(33/11) </text:span> ϩⲉⲑⲛⲟⲥ· ϫⲉ ϣⲟⲣⲡ̅’ ⲙⲉⲛ ⲥⲉ‐ <text:line-break/><text:span text:style-name="T1"> </text:span><text:span text:style-name="T2">(33/12) </text:span> ϩⲟⲧ’ϩⲧ̅’ ⲁⲛ ⲛ̅ⲥⲁ ⲡⲛⲟⲩⲧⲉ· ϫⲉ <text:line-break/><text:span text:style-name="T1"> </text:span><text:span text:style-name="T2">(33/13) </text:span> ⲡⲟⲩⲧⲱⲙ ⲛ̅ϩⲏⲧ’ ⲡⲉⲧ’ⲥⲱⲕ <text:line-break/><text:span text:style-name="T1"> </text:span><text:span text:style-name="T2">(33/14) </text:span> ⲙ̅ⲙⲟⲟⲩ ⲉϩⲣⲁⲓ̈ ⲉⲧⲟⲩⲙⲛ̅ⲧ’ⲟⲩ <text:line-break/><text:soft-page-break/><text:span text:style-name="T1"> </text:span><text:span text:style-name="T2">(33/15) </text:span> ⲁ{ϩ̅ⲓ}ⲏⲧ’ ⲉⲧⲣⲉⲩⲉⲓⲣⲉ ⲙ̅ⲙⲟⲥ· <text:line-break/><text:span text:style-name="T1"> </text:span><text:span text:style-name="T2">(33/16) </text:span> ⲁⲩⲱ ⲟⲛ ⲉⲩϣⲁⲛϭⲓⲛⲉ ⲛ̅ⲕⲉ‐ <text:line-break/><text:span text:style-name="T1"> </text:span><text:span text:style-name="T2">(33/17) </text:span> ⲟⲩⲁ ⲉϥϣⲓⲛⲉ ⲉⲧⲃⲉ ⲡⲉϥⲟⲩ‐ <text:line-break/><text:span text:style-name="T1"> </text:span><text:span text:style-name="T2">(33/18) </text:span> ϫⲁⲉⲓ· ϣⲁⲣⲉⲡⲟⲩⲧⲱⲙ ⲛ̅‐ <text:line-break/><text:span text:style-name="T1"> </text:span><text:span text:style-name="T2">(33/19) </text:span> ϩⲏⲧ’ ⲣ̅ⲉⲛⲉⲣⲅⲉⲓ ⲉϩⲟⲩⲛ ⲉ‐ <text:line-break/><text:span text:style-name="T1"> </text:span><text:span text:style-name="T2">(33/20) </text:span> ⲡⲣⲱⲙⲉ ⲉⲧⲙ̅ⲙⲁⲩ· ⲉϥⲧⲙ̅ <text:line-break/><text:span text:style-name="T1"> </text:span><text:span text:style-name="T2">(33/21) </text:span> ⲕⲁⲣⲱϥ ⲇⲉ ⲉϥϣⲓⲛⲉ· ϣⲁⲩ <text:line-break/><text:span text:style-name="T1"> </text:span><text:span text:style-name="T2">(33/22) </text:span> ϩⲟⲧⲃⲉϥ ⲉⲃⲟⲗ {ϩ̅ⲓ}ⲧⲟⲟⲧⲥ̅ ⲛ̅‐ <text:line-break/><text:span text:style-name="T1"> </text:span><text:span text:style-name="T2">(33/23) </text:span> ⲧⲟⲩⲙⲛ̅ⲧ’ⲟⲩⲁϩⲉⲓⲏⲧ’· ⲉⲩ‐ <text:line-break/><text:span text:style-name="T1"> </text:span><text:span text:style-name="T2">(33/24) </text:span> ⲙⲉⲉⲩⲉ ϫⲉ ⲛ̅ⲧⲁⲩⲉⲓⲣⲉ ⲛ̅ⲛⲟⲩ‐ <text:line-break/><text:span text:style-name="T1"> </text:span><text:span text:style-name="T2">(33/25) </text:span> ⲁⲅⲁⲑⲟⲛ ⲛⲁⲩ· ⲕⲁⲓⲧⲟⲓ ⲅⲉ ⲛ̅‐ <text:line-break/><text:span text:style-name="T1"> </text:span><text:span text:style-name="T2">(33/26) </text:span> ϣⲏⲣⲉ ⲛⲉ ⲙ̅ⲡⲇⲓⲁⲃⲟⲗⲟⲥ· <text:line-break/><text:span text:style-name="T1"> </text:span><text:span text:style-name="T2">(33/27) </text:span> ⲛ̅ϩⲉⲑⲛⲟⲥ ⲅⲁⲣ ϩⲱⲟⲩ ⲥⲉϯ <text:line-break/><text:span text:style-name="T1"> </text:span><text:span text:style-name="T2">(33/28) </text:span> ⲙⲛ̅ⲧⲛⲁ· ⲁⲩⲱ ⲥⲉⲥⲟⲟⲩⲛ <text:line-break/><text:span text:style-name="T1"> </text:span><text:span text:style-name="T2">(33/29) </text:span> ϫⲉ ⲡⲛⲟⲩⲧⲉ ⲉⲧ’ϩⲛ̅ ⲙ̅ⲡⲏⲩⲉ <text:line-break/><text:span text:style-name="T1"> </text:span><text:span text:style-name="T2">(33/30) </text:span> ϣⲟⲟⲡ’· ⲡⲓⲱⲧ’ ⲙ̅ⲡⲧⲏⲣϥ̅ ⲉϥ‐ <text:line-break/><text:span text:style-name="T1"> </text:span><text:span text:style-name="T2">(33/31) </text:span> ϫⲟⲥⲉ ⲉⲛⲉⲩⲉⲓⲇⲱⲗⲟⲛ ⲉⲧⲟⲩ‐ <text:line-break/><text:span text:style-name="T1"> </text:span><text:span text:style-name="T2">(33/32) </text:span> ⲟⲩⲱϣⲧ̅’ ⲙ̅ⲙⲟⲟⲩ· <text:line-break/><text:span text:style-name="T1"> </text:span><text:span text:style-name="T2">(34/1) </text:span> ⲙ̅ⲡⲟⲩⲥⲱⲧⲙ̅ ⲇⲉ ⲉⲡⲗⲟⲅⲟⲥ ϫⲉ <text:line-break/><text:span text:style-name="T1"> </text:span><text:span text:style-name="T2">(34/2) </text:span> ⲉⲩⲛⲁϩⲟⲧ’ϩⲧ̅’ ⲛ̅ⲥⲁ ⲛⲉϥ{ϩ̅ⲓ}ⲟⲟⲩⲉ· <text:line-break/><text:span text:style-name="T1"> </text:span><text:span text:style-name="T2">(34/3) </text:span> ⲧⲁⲓ̈ ϭⲉ ⲧⲉ ⲑⲉ ⲙ̅ⲡⲣⲱⲙⲉ ⲛ̅ⲁⲛⲟⲏ‐ <text:line-break/><text:span text:style-name="T1"> </text:span><text:span text:style-name="T2">(34/4) </text:span> ⲧⲟⲥ ⲉϥⲥⲱⲧⲙ̅ ⲙⲉⲛ ⲉⲡⲧⲱϩⲙ̅· <text:line-break/><text:span text:style-name="T1"> </text:span><text:span text:style-name="T2">(34/5) </text:span> ϥⲟ ⲛ̅ⲇⲉ ⲛ̅ⲛⲁⲧⲥⲟⲟⲩⲛ ⲉⲡⲙⲁ <text:line-break/><text:span text:style-name="T1"> </text:span><text:span text:style-name="T2">(34/6) </text:span> ⲉⲛⲧⲁⲩⲧⲁϩⲙⲉϥ ⲉⲣⲟϥ· ⲁⲩⲱ <text:line-break/><text:span text:style-name="T1"> </text:span><text:span text:style-name="T2">(34/7) </text:span> ⲙ̅ⲡⲉϥϣⲓⲛⲉ ϩⲣⲁⲓ̈ ϩⲙ̅ ⲡⲧⲁϣⲉ <text:line-break/><text:span text:style-name="T1"> </text:span><text:span text:style-name="T2">(34/8) </text:span> ⲟⲉⲓϣ· ϫⲉ ⲉⲣⲉⲡⲉⲣⲡⲉ ⲛ̅ⲁϣ ⲙ̅‐ <text:line-break/><text:span text:style-name="T1"> </text:span><text:span text:style-name="T2">(34/9) </text:span> ⲙⲁ· ⲡⲁⲓ̈ ⲉϯⲛⲁⲃⲱⲕ ⲛ̅ⲧⲁⲟⲩⲱ‐ <text:line-break/><text:span text:style-name="T1"> </text:span><text:span text:style-name="T2">(34/10) </text:span> ϣⲧ̅’ ⲛ̅ⲧⲁϩⲉⲗⲡⲓⲥ ⲛ̅ϩⲣⲁⲓ̈ ⲛ̅ϩⲏⲧϥ̅· <text:line-break/><text:span text:style-name="T1"> </text:span><text:span text:style-name="T2">(34/11) </text:span> ⲉⲧⲃⲉ ⲧⲉϥⲙⲛ̅ⲧ’ⲁⲛⲟⲏⲧⲟⲥ ϭⲉ <text:line-break/><text:span text:style-name="T1"> </text:span><text:span text:style-name="T2">(34/12) </text:span> ϥϩⲟⲟⲩ ⲛ̅ϩⲟⲩⲟ ⲉⲩϩⲉⲑⲛⲟⲥ· <text:line-break/><text:span text:style-name="T1"> </text:span><text:span text:style-name="T2">(34/13) </text:span> ϫⲉ ⲛ̅ϩⲉⲑⲛⲟⲥ ⲅⲁⲣ ⲥⲉⲥⲟⲟⲩⲛ <text:line-break/><text:span text:style-name="T1"> </text:span><text:span text:style-name="T2">(34/14) </text:span> ⲛ̅ⲑⲓⲏ ⲛ̅ⲃⲱⲕ ⲉⲡⲟⲩⲣ̅ⲡⲉ ⲛ̅ⲱⲛⲉ <text:line-break/><text:span text:style-name="T1"> </text:span><text:span text:style-name="T2">(34/15) </text:span> ⲉⲧⲛⲁⲧⲁⲕⲟ ⲛ̅ⲥⲉⲟⲩⲱϣⲧ̅’ ⲙ̅‐ <text:line-break/><text:span text:style-name="T1"> </text:span><text:span text:style-name="T2">(34/16) </text:span> ⲡⲉⲩⲉⲓⲇⲱⲗⲟⲛ ⲉⲣⲉϩⲧⲏⲟⲩ‐ <text:line-break/><text:span text:style-name="T1"> </text:span><text:span text:style-name="T2">(34/17) </text:span> ⲕⲏ ⲉⲣⲟϥ ϫⲉ ⲛ̅ⲧⲟⲫ ⲡⲉ ⲧⲟⲩϩⲉⲗ‐ <text:line-break/><text:span text:style-name="T1"> </text:span><text:span text:style-name="T2">(34/18) </text:span> ⲡⲓⲥ· ⲡⲉⲉⲓⲁⲛⲟⲏⲧⲟⲥ ⲇⲉ ⲛ̅ⲧⲁⲩ <text:line-break/><text:span text:style-name="T1"> </text:span><text:span text:style-name="T2">(34/19) </text:span> ⲧⲁϣⲉ ⲟⲉⲓϣ ⲛⲁϥ ⲙ̅ⲡⲗⲟⲅⲟⲥ· <text:line-break/><text:span text:style-name="T1"> </text:span><text:span text:style-name="T2">(34/20) </text:span> ⲉⲩϯ ⲥⲃⲱ ⲛⲁϥ ϫⲉ ϣⲓⲛⲉ ⲛ̅ⲅ’ϩⲟⲧ’‐ <text:line-break/><text:span text:style-name="T1"> </text:span><text:span text:style-name="T2">(34/21) </text:span> ϩⲧ̅’ ⲛ̅ⲥⲁ ⲛ̅{ϩ̅ⲓ}ⲟⲟⲩⲉ ⲉⲧⲕ̅ⲛⲁⲃⲱⲕ <text:line-break/><text:span text:style-name="T1"> </text:span><text:span text:style-name="T2">(34/22) </text:span> {ϩ̅ⲓ}ⲱⲟⲩ· ⲉⲙⲛ̅ ϭⲉⲗⲁⲁⲩ ⲛ̅ϩⲱⲃ <text:line-break/><text:span text:style-name="T1"> </text:span><text:span text:style-name="T2">(34/23) </text:span> ⲉⲛⲁⲛⲟⲩϥ ⲛ̅ⲑⲉ ⲙ̅ⲡⲉⲓ̈ϩⲱⲃ· <text:line-break/><text:span text:style-name="T1"> </text:span><text:span text:style-name="T2">(34/24) </text:span> ϫⲉ ϣⲓⲛⲁ ϫⲉ ⲧⲟⲩⲥⲓⲁ ⲙ̅ⲡⲧⲱⲙ <text:line-break/><text:span text:style-name="T1"> </text:span><text:span text:style-name="T2">(34/25) </text:span> ⲛ̅ϩⲏⲧ’ ⲥϯ̅ ⲕⲗ̅ⲯ ⲉϩⲣⲁⲓ̈ ⲉϫⲙ̅ <text:line-break/><text:span text:style-name="T1"> </text:span><text:span text:style-name="T2">(34/26) </text:span> ⲡⲉϥⲛⲟⲩⲥ· ⲙⲛ̅ ⲧⲉⲛⲉⲣⲅⲉⲓ‐ <text:line-break/><text:span text:style-name="T1"> </text:span><text:span text:style-name="T2">(34/27) </text:span> ⲁ ⲛ̅ⲧⲙⲛ̅ⲧ’ⲁⲧ’ⲥⲟⲟⲩⲛ ⲙⲛ̅ <text:line-break/><text:span text:style-name="T1"> </text:span><text:span text:style-name="T2">(34/28) </text:span> ⲡⲇⲁⲓⲙⲟⲛⲓⲟⲛ ⲛ̅ⲧⲡⲗⲁⲛⲏ <text:line-break/><text:span text:style-name="T1"> </text:span><text:span text:style-name="T2">(34/29) </text:span> ⲉⲩⲕⲱ ⲁⲛ ⲙ̅ⲡⲉϥⲛⲟⲩⲥ <text:line-break/><text:soft-page-break/><text:span text:style-name="T1"> </text:span><text:span text:style-name="T2">(34/30) </text:span> ⲉⲧⲱⲱⲛ ⲉϩⲣⲁⲓ̈ ϫⲉ ⲛⲉϥϩⲉⲥ <text:line-break/><text:span text:style-name="T1"> </text:span><text:span text:style-name="T2">(34/31) </text:span> ⲧϥ̅ ⲉϥϣⲓⲛⲉ ⲛ̅ϥⲙ̅ⲙⲉ ⲁⲧⲉϥ <text:line-break/><text:span text:style-name="T1"> </text:span><text:span text:style-name="T2">(34/32) </text:span> ϩⲉⲗⲡⲓⲥ· ⲧⲯⲩⲭⲏ ⲇⲉ ⲛ̅ⲧⲟⲥ <text:line-break/><text:span text:style-name="T1"> </text:span><text:span text:style-name="T2">(35/1) </text:span> ⲛ̅ⲗⲟⲅⲓⲕⲏ ⲛ̅ⲧⲁⲥϩⲉⲥⲧ̅[ⲥ̅] ⲉⲥϣⲓⲛⲉ <text:line-break/><text:span text:style-name="T1"> </text:span><text:span text:style-name="T2">(35/2) </text:span> ⲁⲥϫⲓ ⲥⲟⲟⲩⲛ ⲉⲡⲛⲟⲩⲧⲉ· <text:line-break/><text:span text:style-name="T1"> </text:span><text:span text:style-name="T2">(35/3) </text:span> ⲁⲥⲙⲟⲕϩⲥ̅ ⲉⲥϩⲁⲧ’ϩⲧ̅’ ⲉⲥⲣ̅ⲧⲁ‐ <text:line-break/><text:span text:style-name="T1"> </text:span><text:span text:style-name="T2">(35/4) </text:span> ⲗⲁⲓⲡⲱⲣⲓ ϩⲙ̅ ⲡⲥⲱⲙⲁ· ⲉⲥ{ϩ̅ⲓ}ⲧⲉ <text:line-break/><text:span text:style-name="T1"> </text:span><text:span text:style-name="T2">(35/5) </text:span> ⲛ̅ⲛⲉⲥⲟⲩⲉⲣⲏⲧⲉ {ϩ̅ⲓ}ⲣⲱⲟ̣ⲩ <text:line-break/><text:span text:style-name="T1"> </text:span><text:span text:style-name="T2">(35/6) </text:span> ⲛ̅ⲛ̅ⲉⲩⲁⲅ’ⲅⲉⲗⲓⲥⲧⲏⲥ ⲉⲥ‐ <text:line-break/><text:span text:style-name="T1"> </text:span><text:span text:style-name="T2">(35/7) </text:span> ϫⲓ ⲥⲟⲟⲩⲛ ⲉⲡⲓⲁⲧⲛ̅ⲣⲁⲧϥ̅· <text:line-break/><text:span text:style-name="T1"> </text:span><text:span text:style-name="T2">(35/8) </text:span> ⲁⲥϭⲓⲛⲉ ⲛ̅ⲧⲉⲥⲁⲛⲁⲧⲟⲗⲏ <text:line-break/><text:span text:style-name="T1"> </text:span><text:span text:style-name="T2">(35/9) </text:span> ⲁⲥⲙⲟⲧⲛⲉⲥ ϩⲣⲁⲓ̈ ϩⲙ̅ ⲡⲉⲧ’‐ <text:line-break/><text:span text:style-name="T1"> </text:span><text:span text:style-name="T2">(35/10) </text:span> ⲙⲟⲧⲛ̅ ⲙ̅ⲙⲟϥ· ⲁⲥⲛⲟϫⲥ̅ ϩⲣⲁⲓ̈ <text:line-break/><text:span text:style-name="T1"> </text:span><text:span text:style-name="T2">(35/11) </text:span> ϩⲙ̅ ⲡⲙⲁ ⲛ̅ϣⲉⲗⲉⲉⲧ’· ⲁⲥⲟⲩ‐ <text:line-break/><text:span text:style-name="T1"> </text:span><text:span text:style-name="T2">(35/12) </text:span> ⲱⲙ ⲉⲃⲟⲗ ϩⲙ̅ ⲡⲇⲓⲡⲛⲟⲛ ⲉⲧⲉ <text:line-break/><text:span text:style-name="T1"> </text:span><text:span text:style-name="T2">(35/13) </text:span> ⲛⲉⲥϩⲕⲁⲉⲓⲧ’ ⲙ̅ⲙⲟϥ· ⲁⲥϫⲓ <text:line-break/><text:span text:style-name="T1"> </text:span><text:span text:style-name="T2">(35/14) </text:span> ⲉⲃⲟⲗ ϩⲛ̅ ⲧⲣⲟⲫⲏ ⲛ̅ⲛⲁⲧⲙⲟⲩ· <text:line-break/><text:span text:style-name="T1"> </text:span><text:span text:style-name="T2">(35/15) </text:span> ⲁⲥϭⲓⲛⲉ ⲙ̅ⲡⲉⲧⲥ̅ϣⲓⲛⲉ ⲛ̅ⲥⲱϥ· <text:line-break/><text:span text:style-name="T1"> </text:span><text:span text:style-name="T2">(35/16) </text:span> ⲁⲥϫⲓ ⲙ̅ⲧⲟⲛ ϩⲁ ⲛⲉⲥ{ϩ̅ⲓ}ⲥⲉ· <text:line-break/><text:span text:style-name="T1"> </text:span><text:span text:style-name="T2">(35/17) </text:span> ⲉⲣⲉⲡⲟⲩⲟⲉⲓⲛ ⲉⲧ’ⲡⲣ̅ⲣⲓⲱⲟⲩ <text:line-break/><text:span text:style-name="T1"> </text:span><text:span text:style-name="T2">(35/18) </text:span> ⲉϩⲣⲁⲓ̈ ⲉϫⲱⲥ ⲉⲙⲁϥϩⲱⲧⲡ̅’· <text:line-break/><text:span text:style-name="T1"> </text:span><text:span text:style-name="T2">(35/19) </text:span> ⲡⲁⲓ̈ ⲉⲧⲉ ⲡⲱϥ ⲡⲉ ⲡⲉⲟⲟⲩ <text:line-break/><text:span text:style-name="T1"> </text:span><text:span text:style-name="T2">(35/20) </text:span> ⲙⲛ̅ ⲡⲁⲙⲁϩⲧⲉ ⲙⲛ̅ ⲡⲟⲩⲱ‐ <text:line-break/><text:span text:style-name="T1"> </text:span><text:span text:style-name="T2">(35/21) </text:span> ⲛϩ̅ ⲉⲃⲟⲗ ϣⲁ ⲉⲛⲉϩ ⲛ̅ⲧⲉ <text:line-break/><text:span text:style-name="T1"> </text:span><text:span text:style-name="T2">(35/22) </text:span> ⲛⲓⲉⲛⲉϩ ϩⲁⲙⲏⲛ· <text:line-break/><text:span text:style-name="T1"> </text:span><text:span text:style-name="T2">(35/23) </text:span> ⲁⲩⲑⲉⲛⲧⲓⲕⲟⲥ <text:line-break/><text:span text:style-name="T1"> </text:span><text:span text:style-name="T2">(35/24) </text:span> ⲗⲟⲅⲟⲥ· </text:p>
      <text:p text:style-name="P1"/>
      <text:p text:style-name="P3">( codex VI ) The Concept of Our Great Power</text:p>
      <text:p text:style-name="P2"><text:span text:style-name="T1"> </text:span><text:span text:style-name="T2">(36/1) </text:span> ⲧⲉⲥⲑⲏⲥⲓⲥ ⲛ̅ⲇⲓⲁⲛⲟⲓⲁ· <text:line-break/><text:span text:style-name="T1"> </text:span><text:span text:style-name="T2">(36/2) </text:span> ⲡ̣ⲛⲟⲏⲙⲁ ⲛ̅ⲧⲛⲁϭ ⲛ̅ϭⲁⲙ· <text:line-break/><text:span text:style-name="T1"> </text:span><text:span text:style-name="T2">(36/3) </text:span> ʹ26ⲁⲩⲱ ⲡⲉⲧⲛⲁⲥⲟⲩⲱⲛ ⲧⲛ̅ⲛⲟϭ <text:line-break/><text:span text:style-name="T1"> </text:span><text:span text:style-name="T2">(36/4) </text:span> ⲛ̅ϭⲟⲙ ϥⲛⲁϣⲱⲡⲉ ⲛ̅ⲁϩⲟⲣⲁ‐ <text:line-break/><text:span text:style-name="T1"> </text:span><text:span text:style-name="T2">(36/5) </text:span> [ⲧ]ⲟⲛ· ⲁⲩⲱ ⲙ̅ⲙⲛ̅ ⲕⲱϩⲧ̅’ <text:line-break/><text:span text:style-name="T1"> </text:span><text:span text:style-name="T2">(36/6) </text:span> ⲛⲁϣⲣⲟⲕϩϥ̅· ⲁⲩⲱ ϥⲛⲁ‐ <text:line-break/><text:span text:style-name="T1"> </text:span><text:span text:style-name="T2">(36/7) </text:span> ⲧⲃ̅ⲃⲟ· ⲁⲩⲱ ϥⲛⲁϥⲱⲧⲉ ⲉⲃⲟⲗ <text:line-break/><text:span text:style-name="T1"> </text:span><text:span text:style-name="T2">(36/8) </text:span> ⲛ̅ⲁⲙⲁϩⲧⲉ ⲛⲓⲙ ⲛ̅ⲧⲏⲧⲛ̅· ϫⲉ <text:line-break/><text:span text:style-name="T1"> </text:span><text:span text:style-name="T2">(36/9) </text:span> ⲟⲩⲟⲛ ⲛⲓⲙ ⲉⲧⲉⲣⲉⲧⲁⲙⲟⲣⲫⲏ <text:line-break/><text:span text:style-name="T1"> </text:span><text:span text:style-name="T2">(36/10) </text:span> ⲛⲁⲟⲩⲱⲛϩ̅ ⲉⲃⲟⲗ ⲛ̅ϩⲏⲧϥ̅ ϥⲛⲁ‐ <text:line-break/><text:span text:style-name="T1"> </text:span><text:span text:style-name="T2">(36/11) </text:span> ⲟⲩϫⲁⲓ̈· ϫⲓⲛ ⲥⲁϣϥ̅ ⲛ̅ϩⲟⲟⲩ <text:line-break/><text:span text:style-name="T1"> </text:span><text:span text:style-name="T2">(36/12) </text:span> ϣⲁ ϣⲉ ϫⲟⲩⲱⲧⲉ ⲛ̅ⲣⲟⲙⲡⲉ· <text:line-break/><text:span text:style-name="T1"> </text:span><text:span text:style-name="T2">(36/13) </text:span> ⲉⲧⲉ ⲛⲉⲉⲓ〈ⲣ̅〉 ϩⲧⲟⲣ ⲉⲣⲟⲟⲩ ⲉⲧⲣⲉⲩ‐ <text:line-break/><text:span text:style-name="T1"> </text:span><text:span text:style-name="T2">(36/14) </text:span> ⲥⲉⲩϩ ⲡϩⲁⲉⲓⲉ ⲧⲏⲣϥ̅· ⲁⲩⲱ <text:line-break/><text:span text:style-name="T1"> </text:span><text:span text:style-name="T2">(36/15) </text:span> ⲛ̅ⲥϩⲁⲓ̈ ⲛ̅ⲧⲛ̅ⲛⲁϭ ⲛ̅ϭⲁⲙ· {ϩ̅ⲓ}ⲛⲁ <text:line-break/><text:span text:style-name="T1"> </text:span><text:span text:style-name="T2">(36/16) </text:span> ϫⲉ ⲉⲥⲁⲥϩⲁⲉⲓ ⲙ̅ⲡⲉⲕⲣⲁⲛ ϩⲣⲁⲓ̈ <text:line-break/><text:span text:style-name="T1"> </text:span><text:span text:style-name="T2">(36/17) </text:span> ϩⲙ̅ ⲡⲛ̅ⲛⲟϭ ⲛ̅ⲟⲩⲟⲉⲓⲛ ⲁⲩⲱ <text:line-break/><text:span text:style-name="T1"> </text:span><text:span text:style-name="T2">(36/18) </text:span> ⲛ̅ⲥϫⲟⲕⲟⲩ ⲉⲃⲟⲗ ⲛ̅ϭⲓ ⲛⲟⲩⲉ‐ <text:line-break/><text:span text:style-name="T1"> </text:span><text:span text:style-name="T2">(36/19) </text:span> ⲡⲓⲛⲟⲓⲁ ⲙⲛ̅ ⲛⲟⲩϩⲃⲏⲩⲉ· <text:line-break/><text:span text:style-name="T1"> </text:span><text:span text:style-name="T2">(36/20) </text:span> ϫⲉⲕⲁⲁⲥ ⲉⲩⲛⲁⲧⲟⲩⲃⲁⲟⲩ <text:line-break/><text:span text:style-name="T1"> </text:span><text:span text:style-name="T2">(36/21) </text:span> ⲥⲉϫⲟⲣⲟⲩ ⲉⲃⲟⲗ· ⲁⲩⲱ ⲥⲉⲟ‐ <text:line-break/><text:span text:style-name="T1"> </text:span><text:span text:style-name="T2">(36/22) </text:span> ϫⲛⲟⲩ· ⲛ̅ⲥⲉⲥⲟⲟⲩϩⲟⲩ ϩⲙ̅ <text:line-break/><text:span text:style-name="T1"> </text:span><text:span text:style-name="T2">(36/23) </text:span> ⲡⲧⲟⲡⲟⲥ ⲉⲧⲉ ⲙ̅ⲙⲛ̅ ⲗⲁⲁⲩ <text:line-break/><text:span text:style-name="T1"> </text:span><text:span text:style-name="T2">(36/24) </text:span> ⲛ̅ϩⲏⲧϥ̅ ⲛⲁⲩ ⲉⲣⲟ〈ⲓ̈〉· ⲁⲩⲱ ⲧⲉ‐ <text:line-break/><text:span text:style-name="T1"> </text:span><text:span text:style-name="T2">(36/25) </text:span> ⲧⲛ̅ⲛⲁⲛⲁⲩ ⲉⲣⲟⲓ̈· ⲁⲩⲱ ⲛ̅ⲧⲉ‐ <text:line-break/><text:span text:style-name="T1"> </text:span><text:span text:style-name="T2">(36/26) </text:span> ⲧⲛ̅ⲥⲟⲃⲧⲉ ⲛ̅ⲛⲉⲧⲛ̅ⲙⲁ ⲛ̅ϣⲱ‐ <text:line-break/><text:span text:style-name="T1"> </text:span><text:span text:style-name="T2">(36/27) </text:span> ⲡⲉ ϩⲛ̅ ⲧⲛ̅ⲛⲟϭ ⲛ̅ϭⲟⲙ· ⲥⲟⲩ‐ <text:line-break/><text:span text:style-name="T1"> </text:span><text:span text:style-name="T2">(36/28) </text:span> ⲱⲛ ⲡⲉⲛⲧⲁϥⲃⲱⲕ ϫⲉ ⲡⲱⲥ <text:line-break/><text:span text:style-name="T1"> </text:span><text:span text:style-name="T2">(36/29) </text:span> ⲁϥϣⲱⲡⲉ· {ϩ̅ⲓ}ⲛⲁ ϫⲉ ⲉⲧⲉ‐ <text:line-break/><text:span text:style-name="T1"> </text:span><text:span text:style-name="T2">(36/30) </text:span> ⲧⲛⲁⲥⲟⲩⲱⲛ ⲡⲉⲧⲁⲛϩ̅ ⲁϣⲱ‐ <text:line-break/><text:span text:style-name="T1"> </text:span><text:span text:style-name="T2">(36/31) </text:span> ⲡⲉ· ϫⲉ ⲁϣ ⲧⲉ ⲑⲉ ⲛ̅ⲣ̅ⲛⲟⲉⲓ <text:line-break/><text:span text:style-name="T1"> </text:span><text:span text:style-name="T2">(36/32) </text:span> ⲙ̅ⲙⲟϥ ϫⲉ ⲟⲩⲁϣ ⲛ̅ⲉⲟⲩⲁⲛ ⲡⲉ <text:line-break/><text:span text:style-name="T1"> </text:span><text:span text:style-name="T2">(36/33) </text:span> ⲡⲁⲓⲱⲛ ⲉⲧⲙ̅ⲙⲁⲩ· ⲏ%0 ⲟⲩ <text:line-break/><text:span text:style-name="T1"> </text:span><text:span text:style-name="T2">(37/1) </text:span> ⲁϣ ⲙ̅ⲙⲓⲛⲉ ⲡⲉ· ⲏ%0 ϫⲉ ⲉ[ⲛⲧⲁϥ] <text:line-break/><text:span text:style-name="T1"> </text:span><text:span text:style-name="T2">(37/2) </text:span> ϣⲱⲡⲉ ⲛ̅ⲁϣ ⲛ̅ϩⲉ· ⲉⲧⲃ̣[ⲉ ⲟⲩ] <text:line-break/><text:span text:style-name="T1"> </text:span><text:span text:style-name="T2">(37/3) </text:span> ⲧⲉⲧⲛ̅ϣⲓⲛⲉ ⲁⲛ ϫⲉ ⲁϣ [ⲙ̅ⲙⲓⲛⲉ] <text:line-break/><text:span text:style-name="T1"> </text:span><text:span text:style-name="T2">(37/4) </text:span> ⲉⲧⲉⲧⲛⲁϣⲱⲡⲉ ⲙ̅ⲙⲟⲥ̣[· ⲁϣ] <text:line-break/><text:span text:style-name="T1"> </text:span><text:span text:style-name="T2">(37/5) </text:span> ⲛ̅ϩⲉ ⲛ̅ⲧⲟϥ ⲁⲧⲉⲧⲛ̅ϣⲱⲡⲉ[·] <text:line-break/><text:span text:style-name="T1"> </text:span><text:span text:style-name="T2">(37/6) </text:span> ⲁⲣⲓⲛⲟⲉⲓ ϫⲉ ⲟⲩⲁϣ ⲛ̅ⲁⲉⲓⲏ ⲡⲉ <text:line-break/><text:span text:style-name="T1"> </text:span><text:span text:style-name="T2">(37/7) </text:span> ⲡⲓⲙⲟⲟⲩ ϫⲉ ⲟⲩⲁⲧ’ϣⲓⲧϥ̅ ⲡⲉ <text:line-break/><text:span text:style-name="T1"> </text:span><text:span text:style-name="T2">(37/8) </text:span> ⲛ̅ⲁⲧ’ⲧⲉϩⲁϥ· ⲙⲛ̅ ⲧⲉϥⲁⲣⲭⲏ <text:line-break/><text:span text:style-name="T1"> </text:span><text:span text:style-name="T2">(37/9) </text:span> ⲙⲛ̅ ⲧⲉϥϩⲁⲏ ⲉϥϥⲓ ϩⲁ ⲡⲕⲁϩ· ⲉϥ‐ <text:line-break/><text:span text:style-name="T1"> </text:span><text:span text:style-name="T2">(37/10) </text:span> ⲛⲓϥⲉ ϩⲙ̅ ⲡⲁⲏⲣ· ⲡⲁⲓ̈ ⲉⲧⲟⲩⲛ̅ <text:line-break/><text:span text:style-name="T1"> </text:span><text:span text:style-name="T2">(37/11) </text:span> ϩⲏⲧϥ̅ ⲛ̅ϭⲓ ⲛ̅ⲛⲟⲩⲧⲉ ⲙⲛ̅ ⲛ̅ⲁⲅ’‐ <text:line-break/><text:span text:style-name="T1"> </text:span><text:span text:style-name="T2">(37/12) </text:span> ⲅⲉⲗⲟⲥ· ⲁⲩⲱ ⲡⲉⲧ’ϫⲟⲥⲉ ⲉ‐ <text:line-break/><text:span text:style-name="T1"> </text:span><text:span text:style-name="T2">(37/13) </text:span> ⲛⲁⲓ̈ ⲧⲏⲣⲟⲩ ⲉⲣⲉⲑⲣ̅ⲧⲉ ⲛ̅ϩⲏ‐ <text:line-break/><text:span text:style-name="T1"> </text:span><text:span text:style-name="T2">(37/14) </text:span> ⲧϥ̅ ⲙⲛ̅ ⲡⲟⲩⲁⲉⲓⲛ· ⲁⲩⲱ ⲛⲁ‐ <text:line-break/><text:soft-page-break/><text:span text:style-name="T1"> </text:span><text:span text:style-name="T2">(37/15) </text:span> ⲥϩⲁⲓ̈ ⲉⲩⲟⲩⲟⲛϩ̅ ⲉⲃⲟⲗ ⲛ̅ϩⲏⲧϥ̅ <text:line-break/><text:span text:style-name="T1"> </text:span><text:span text:style-name="T2">(37/16) </text:span> ⲁⲉⲓⲧⲁⲁⲩ ⲉⲩⲇⲓⲁⲕⲟⲛⲓⲁ <text:line-break/><text:span text:style-name="T1"> </text:span><text:span text:style-name="T2">(37/17) </text:span> ⲛ̅ⲧⲕⲧⲓⲥⲓⲥ ⲛ̅ⲛ̅ⲥⲁⲣⲁⲝ· ϫⲉ <text:line-break/><text:span text:style-name="T1"> </text:span><text:span text:style-name="T2">(37/18) </text:span> ⲙ̅ⲙⲛ̅ ϭⲟⲙ ⲛ̅ⲧⲉ ⲗⲁⲁⲩ ⲱϩⲉ ⲉⲣⲁ‐ <text:line-break/><text:span text:style-name="T1"> </text:span><text:span text:style-name="T2">(37/19) </text:span> ⲧϥ̅ ⲟⲩⲉϣ ⲛ̅ⲡⲉⲧⲙ̅ⲙⲁⲩ· ⲟⲩ‐ <text:line-break/><text:span text:style-name="T1"> </text:span><text:span text:style-name="T2">(37/20) </text:span> ⲧⲉ ⲙ̅ⲙⲛ̅ ϭⲟⲙ ⲙ̅ⲡⲁⲓⲱⲛ ⲛ̅ⲱⲛϩ̅ <text:line-break/><text:span text:style-name="T1"> </text:span><text:span text:style-name="T2">(37/21) </text:span> ⲛ̅ⲟⲩⲉϣ ⲛ̅ⲃⲗ̅ⲗⲁϥ· ⲉⲩⲛ̅ⲧⲁϥ <text:line-break/><text:span text:style-name="T1"> </text:span><text:span text:style-name="T2">(37/22) </text:span> ⲙ̅ⲙⲁⲩ ⲙ̅ⲡⲉⲧⲛ̅ϩⲏⲧϥ̅ ⲉϥⲣ̅ⲛⲟ‐ <text:line-break/><text:span text:style-name="T1"> </text:span><text:span text:style-name="T2">(37/23) </text:span> ⲉⲓ ϩⲛ̅ ⲟⲩⲡⲉⲧ’ⲟⲩⲁⲁⲃ· ⲧⲟⲧⲉ <text:line-break/><text:span text:style-name="T1"> </text:span><text:span text:style-name="T2">(37/24) </text:span> ⲉⲛⲁⲩ ⲉⲡ̅ⲛ̅ⲁ̅ ⲛ̅ⲧⲉⲧⲛ̅ⲙ̅ⲙⲉ <text:line-break/><text:span text:style-name="T1"> </text:span><text:span text:style-name="T2">(37/25) </text:span> ϫⲉ ⲟⲩⲉⲓ ⲧⲟ ⲡⲉ· ⲁϥⲧⲁⲁϥ ⲛ̅‐ <text:line-break/><text:span text:style-name="T1"> </text:span><text:span text:style-name="T2">(37/26) </text:span> ⲛ̅ⲣⲱⲙⲉ ϫⲉ ⲉⲩⲛⲁϫⲓ ⲱⲛϩ̅ <text:line-break/><text:span text:style-name="T1"> </text:span><text:span text:style-name="T2">(37/27) </text:span> ⲉⲃⲟⲗ ⲛ̅ϩⲏⲧϥ̅ ⲛ̅ϩⲟⲟⲩ ⲛⲓⲙ <text:line-break/><text:span text:style-name="T1"> </text:span><text:span text:style-name="T2">(37/28) </text:span> ⲉⲩⲛ̅ⲧⲁϥ ⲙ̅ⲡⲉϥⲱⲛϩ̅ ⲛ̅ϩⲏ‐ <text:line-break/><text:span text:style-name="T1"> </text:span><text:span text:style-name="T2">(37/29) </text:span> ⲧϥ̅· ⲉϥϯ ⲛⲁⲩ ⲧⲏⲣⲟⲩ· ⲧⲟ‐ <text:line-break/><text:span text:style-name="T1"> </text:span><text:span text:style-name="T2">(37/30) </text:span> ⲧⲉ ⲡⲕⲁⲕⲉ ⲙⲛ̅ⲛ ⲉⲙⲛ̅ⲧⲉ <text:line-break/><text:span text:style-name="T1"> </text:span><text:span text:style-name="T2">(37/31) </text:span> ⲁϥϫⲉ ⲡⲕⲱϩⲧ̅’· ⲁⲩⲱ ⲡⲉ‐ <text:line-break/><text:span text:style-name="T1"> </text:span><text:span text:style-name="T2">(37/32) </text:span> ⲧⲉ ⲡⲱⲉⲓ ⲉϥⲛⲁⲃⲟⲗϥ̅ ⲉⲃⲟⲗ <text:line-break/><text:span text:style-name="T1"> </text:span><text:span text:style-name="T2">(37/33) </text:span> ⲛ̅ϩⲏⲧϥ̅· ⲙ̅ⲡⲉⲛⲉϥⲃⲁⲗ ⲉϣ <text:line-break/><text:span text:style-name="T1"> </text:span><text:span text:style-name="T2">(37/34) </text:span> ϥⲓ ϩⲁ ⲡⲁⲟⲩⲟⲉⲓⲛ· ⲉⲁⲩⲕⲓⲙ <text:line-break/><text:span text:style-name="T1"> </text:span><text:span text:style-name="T2">(37/35) </text:span> ⲛ̅ϭⲓ ⲙ̅ⲡ̅ⲛ̅ⲁ̅ ⲙⲛ̅ ⲙ̅ⲙⲟⲩⲉⲓ〈ⲟⲟⲩⲉ〉 <text:line-break/><text:span text:style-name="T1"> </text:span><text:span text:style-name="T2">(38/1) </text:span> [ⲁⲩ]ⲱ̣ ⲁⲡⲕⲉϣⲱϫⲡ̅’ ϣⲱⲡⲉ· <text:line-break/><text:span text:style-name="T1"> </text:span><text:span text:style-name="T2">(38/2) </text:span> [ⲁⲩ]ⲱ ⲡⲁⲓⲱⲛ ⲧⲏⲣϥ̅ ⲛ̅ⲧⲉ ⲧⲕⲧⲓ‐ <text:line-break/><text:span text:style-name="T1"> </text:span><text:span text:style-name="T2">(38/3) </text:span> [ⲥⲓⲥ] ⲁⲩⲱ ⲛⲟⲩϭⲟ〈ⲙ〉 ⲛ̅ⲧⲁ‐ <text:line-break/><text:span text:style-name="T1"> </text:span><text:span text:style-name="T2">(38/4) </text:span> [ⲡ]ⲕ̣ⲱϩⲧ̅’ ϣⲱⲡⲉ ⲉⲃⲟⲗ ⲙ̅‐ <text:line-break/><text:span text:style-name="T1"> </text:span><text:span text:style-name="T2">(38/5) </text:span> ⲙ̣ⲟⲟⲩ· ⲁⲧ’ϭⲟⲙ ϣⲱⲡⲉ ⲛ̅‐ <text:line-break/><text:span text:style-name="T1"> </text:span><text:span text:style-name="T2">(38/6) </text:span> ⲧⲙⲏⲧⲉ ⲛ̅ⲛ̅ϭⲟⲙ· ⲁⲩⲱ ⲁⲛ‐ <text:line-break/><text:span text:style-name="T1"> </text:span><text:span text:style-name="T2">(38/7) </text:span> ϭⲟⲙ ⲣ̅ⲉⲡⲓⲑⲩⲙⲉⲓ ⲉⲛⲁⲩ ⲉⲧⲁ‐ <text:line-break/><text:span text:style-name="T1"> </text:span><text:span text:style-name="T2">(38/8) </text:span> {ϩ̅ⲓ}ⲕⲱⲛ· ⲁⲩⲱ ⲁⲧ’ⲯⲩⲭⲏ ϣⲱ‐ <text:line-break/><text:span text:style-name="T1"> </text:span><text:span text:style-name="T2">(38/9) </text:span> ⲡⲉ ⲙ̅ⲡⲉⲥⲧⲩⲡⲟⲥ· ⲡⲁⲓ̈ ⲡⲉ <text:line-break/><text:span text:style-name="T1"> </text:span><text:span text:style-name="T2">(38/10) </text:span> ⲡϩⲱⲃ ⲉⲧⲁϩϣⲱⲡⲉ ⲛⲁⲩ ϫⲉ <text:line-break/><text:span text:style-name="T1"> </text:span><text:span text:style-name="T2">(38/11) </text:span> ⲟⲩⲁϣ ⲙ̅ⲙⲓⲛⲉ ⲡⲉ· ϫⲉ ⲙ̅‐ <text:line-break/><text:span text:style-name="T1"> </text:span><text:span text:style-name="T2">(38/12) </text:span> ⲡⲁⲧⲉϥϣⲱⲡⲉ ϥⲛⲁⲩ ⲁⲛ ⲉⲃⲟⲗ <text:line-break/><text:span text:style-name="T1"> </text:span><text:span text:style-name="T2">(38/13) </text:span> ϫⲉ ⲛⲁϥϣⲱⲡⲉ ⲛ̅ϭⲓ ⲡⲁⲓⲱⲛ <text:line-break/><text:span text:style-name="T1"> </text:span><text:span text:style-name="T2">(38/14) </text:span> ⲛ̅ⲧⲥⲁⲣⲁⲝ ϩⲛ̅ ⲛ̅ⲛⲟϭ ⲛ̅ⲥⲱⲙⲁ· <text:line-break/><text:span text:style-name="T1"> </text:span><text:span text:style-name="T2">(38/15) </text:span> ⲁⲩⲱ ⲛⲉϣⲁⲩⲱⲡ’ ⲉⲣⲟⲟⲩ ⲛ̅‐ <text:line-break/><text:span text:style-name="T1"> </text:span><text:span text:style-name="T2">(38/16) </text:span> ϩⲉⲛⲛⲟϭ ⲛ̅ϩⲟⲟⲩ ϩⲛ̅ ⲧⲕⲧⲓⲥⲓⲥ· <text:line-break/><text:span text:style-name="T1"> </text:span><text:span text:style-name="T2">(38/17) </text:span> ϩⲟⲧⲁⲛ ⲅⲁⲣ ⲛ̅ⲧⲁⲣⲟⲩϫⲁϩⲙⲟⲩ <text:line-break/><text:span text:style-name="T1"> </text:span><text:span text:style-name="T2">(38/18) </text:span> ⲛ̅ⲧⲁⲣⲟⲩⲃⲱⲕ ⲉϩⲟⲩⲛ ⲉⲧⲥⲁ‐ <text:line-break/><text:span text:style-name="T1"> </text:span><text:span text:style-name="T2">(38/19) </text:span> ⲣⲁⲝ· ⲁⲩⲱ ⲡⲉⲓⲱⲧ’ ⲛ̅ⲧⲥⲁ‐ <text:line-break/><text:span text:style-name="T1"> </text:span><text:span text:style-name="T2">(38/20) </text:span> ⲣⲁⲝ ⲡⲙⲟⲟⲩ ⲁϥⲉⲓⲣⲉ ⲙ̅ⲡⲉϥ‐ <text:line-break/><text:span text:style-name="T1"> </text:span><text:span text:style-name="T2">(38/21) </text:span> ϩⲁⲡ’ ⲙ̅ⲙⲓⲛ ⲙ̅ⲙⲟϥ· ϩⲟⲧⲁⲛ ⲅⲁⲣ <text:line-break/><text:span text:style-name="T1"> </text:span><text:span text:style-name="T2">(38/22) </text:span> ⲛ̅ⲧⲁⲣⲉϥϭⲛ̅ ⲛⲱϩⲉ ⲉϥⲟ ⲛ̅ⲉⲩ‐ <text:line-break/><text:span text:style-name="T1"> </text:span><text:span text:style-name="T2">(38/23) </text:span> ⲥⲉⲃⲏⲥ ⲉϥⲙ̅ⲡϣⲁ· ⲁⲩⲱ <text:line-break/><text:span text:style-name="T1"> </text:span><text:span text:style-name="T2">(38/24) </text:span> ⲡⲉⲓⲱⲧ’ ⲛ̅ⲧⲥⲁⲣⲁⲝ ⲉϥⲣ̅ϩⲩ‐ <text:line-break/><text:span text:style-name="T1"> </text:span><text:span text:style-name="T2">(38/25) </text:span> ⲡⲟⲧⲁⲥⲥⲉ ⲛ̅ⲛ̅ⲁⲅ’ⲅⲉⲗⲟⲥ· <text:line-break/><text:span text:style-name="T1"> </text:span><text:span text:style-name="T2">(38/26) </text:span> ⲁⲩⲱ ⲁϥⲧⲁϣⲉ ⲟⲉⲓϣ ⲛ̅ⲧⲉⲩ‐ <text:line-break/><text:soft-page-break/><text:span text:style-name="T1"> </text:span><text:span text:style-name="T2">(38/27) </text:span> ⲥⲉⲃⲉⲓⲁ ⲛ̅ϣⲉ ϫⲟⲩⲱⲧⲉ ⲛ̅‐ <text:line-break/><text:span text:style-name="T1"> </text:span><text:span text:style-name="T2">(38/28) </text:span> ⲣⲟⲙⲡⲉ· ⲁⲩⲱ ⲙ̅ⲡⲉⲗⲁⲁⲩ <text:line-break/><text:span text:style-name="T1"> </text:span><text:span text:style-name="T2">(38/29) </text:span> ⲥⲱⲧⲙ̅ ⲛⲁϥ· ⲁⲩⲱ ⲁϥⲧⲁ‐ <text:line-break/><text:span text:style-name="T1"> </text:span><text:span text:style-name="T2">(38/30) </text:span> ⲙⲓⲟ ⲛ̅ⲛⲟⲩϭⲓⲃⲱⲧⲟⲥ ⲛ̅ϣⲉ· <text:line-break/><text:span text:style-name="T1"> </text:span><text:span text:style-name="T2">(38/31) </text:span> ⲁⲩⲱ ⲡⲉⲛⲧⲁϥϭⲛ̅ⲧϥ̅ ⲁϥⲃⲱⲕ <text:line-break/><text:span text:style-name="T1"> </text:span><text:span text:style-name="T2">(38/32) </text:span> ⲉϩⲟⲩⲛ ⲉⲣⲟⲥ· ⲁⲩⲱ ⲁⲡⲕⲁ‐ <text:line-break/><text:span text:style-name="T1"> </text:span><text:span text:style-name="T2">(38/33) </text:span> ⲧⲁⲕⲗⲩⲥⲙⲟⲥ ϣⲱⲡⲉ· <text:line-break/><text:span text:style-name="T1"> </text:span><text:span text:style-name="T2">(39/1) </text:span> ⲁⲩⲱ ⲛ̅ⲧⲉⲓ̈ϩⲉ ⲁⲛⲱϩⲉ ⲟⲩ[ϫ]ⲁⲉⲓ <text:line-break/><text:span text:style-name="T1"> </text:span><text:span text:style-name="T2">(39/2) </text:span> ⲙⲛ̅ ⲛⲉϥϣⲏⲣⲉ· ϫⲉ ⲉⲛⲉ[ⲣ]ⲉ ⲙ̅ⲡⲉ‐ <text:line-break/><text:span text:style-name="T1"> </text:span><text:span text:style-name="T2">(39/3) </text:span> 〈ⲧ〉ϭⲓⲃⲱⲧⲟⲥ ϣⲱⲡⲉ ⲉⲧⲣⲉⲣⲱⲙⲉ <text:line-break/><text:span text:style-name="T1"> </text:span><text:span text:style-name="T2">(39/4) </text:span> ⲃⲱⲕ ⲉϩⲟⲩⲛ ⲉⲣⲟⲥ· ⲛⲉⲡⲙⲟ‐ <text:line-break/><text:span text:style-name="T1"> </text:span><text:span text:style-name="T2">(39/5) </text:span> ⲟⲩ ⲙ̅ⲡⲕⲁⲧⲁⲕⲗⲩⲥⲙⲟⲥ ⲛⲁ̣‐ <text:line-break/><text:span text:style-name="T1"> </text:span><text:span text:style-name="T2">(39/6) </text:span> ϣⲱⲡⲉ ⲁⲛ· ⲛ̅ϯϩⲉ ⲁϥⲣ̅ⲛⲟⲉⲓ <text:line-break/><text:span text:style-name="T1"> </text:span><text:span text:style-name="T2">(39/7) </text:span> ⲁϥⲙⲉⲉⲩⲉ ⲉⲛⲟⲩϩⲙ̅ ⲛ̅ⲛⲟⲩ‐ <text:line-break/><text:span text:style-name="T1"> </text:span><text:span text:style-name="T2">(39/8) </text:span> ⲧⲉ ⲙⲛ̅ ⲛ̅ⲁⲅ’ⲅⲉⲗⲟⲥ· ⲁⲩⲱ ⲛ̅ϭⲟⲙ <text:line-break/><text:span text:style-name="T1"> </text:span><text:span text:style-name="T2">(39/9) </text:span> 〈ⲛ̅ⲧ〉ⲙⲛ̅ⲧⲛⲟϭ ⲛ̅ⲛⲁⲓ̈ ⲧⲏⲣⲟⲩ· <text:line-break/><text:span text:style-name="T1"> </text:span><text:span text:style-name="T2">(39/10) </text:span> ⲁⲩⲱ ⲧⲣⲩⲫⲏ ⲙⲛ̅ ⲡⲧⲣⲟⲡⲟⲥ· <text:line-break/><text:span text:style-name="T1"> </text:span><text:span text:style-name="T2">(39/11) </text:span> ⲁⲩⲱ ⲉϥⲡⲱⲛⲉ ⲙ̅ⲙⲟⲟⲩ ϩⲙ̅ <text:line-break/><text:span text:style-name="T1"> </text:span><text:span text:style-name="T2">(39/12) </text:span> ⲡⲁⲓⲱⲛ ⲉϥⲥⲁⲛⲉϣ ⲙ̅ⲙⲟⲟⲩ <text:line-break/><text:span text:style-name="T1"> </text:span><text:span text:style-name="T2">(39/13) </text:span> ϩⲛ̅ ⲛ̅ⲇⲓⲁⲙⲟⲛⲏ· ⲁⲩⲱ ⲫⲁⲡ’ <text:line-break/><text:span text:style-name="T1"> </text:span><text:span text:style-name="T2">(39/14) </text:span> ⲛ̅ⲧⲥⲁⲣⲁⲝ· ⲁϥⲃⲱⲗ· ⲁⲫⲱⲃ̓ ⲛ̅‐ <text:line-break/><text:span text:style-name="T1"> </text:span><text:span text:style-name="T2">(39/15) </text:span> ⲟⲩⲱⲧ’ ⲛ̅ⲧϭⲁⲙ ⲱϩⲉⲣⲁⲧϥ̅· <text:line-break/><text:span text:style-name="T1"> </text:span><text:span text:style-name="T2">(39/16) </text:span> ⲧⲟⲧⲉ ϯⲛⲟⲩ ⲡⲯⲩⲭⲓⲕⲟⲥ <text:line-break/><text:span text:style-name="T1"> </text:span><text:span text:style-name="T2">(39/17) </text:span> ⲛ̅ⲁⲓⲱⲛ ϩⲱⲱϥ· ⲟⲩⲕⲟⲩⲉⲓ <text:line-break/><text:span text:style-name="T1"> </text:span><text:span text:style-name="T2">(39/18) </text:span> ⲡⲉ ⲉϥⲧⲏϩ ⲙⲛ̅ ⲛ̅ⲥⲱⲙⲁ· <text:line-break/><text:span text:style-name="T1"> </text:span><text:span text:style-name="T2">(39/19) </text:span> ⲉϥϫⲡⲟ ϩⲛ̅ ⲛ̅ⲯⲩⲭⲏ ⲉϥϫⲱϩⲙ̅· <text:line-break/><text:span text:style-name="T1"> </text:span><text:span text:style-name="T2">(39/20) </text:span> ϫⲉ ⲡϫⲱϩⲙ̅ ⲛ̅ϣⲟⲣⲡ̅’ ⲛ̅ⲧⲕⲧⲓ‐ <text:line-break/><text:span text:style-name="T1"> </text:span><text:span text:style-name="T2">(39/21) </text:span> ⲥⲓⲥ ⲁϥϭⲛ̅ ϫⲓⲛ· ⲁⲩⲱ ⲁϥϫⲡⲉ <text:line-break/><text:span text:style-name="T1"> </text:span><text:span text:style-name="T2">(39/22) </text:span> ⲉⲛⲉⲣⲅⲉⲓⲁ ⲛⲓⲙ· ϩⲁϩ ⲛ̅ⲛⲉⲛⲉⲣ‐ <text:line-break/><text:span text:style-name="T1"> </text:span><text:span text:style-name="T2">(39/23) </text:span> ⲅⲉⲓⲁ ⲛ̅ⲟⲣⲅⲏ· ⲧⲃⲗ̅ⲕⲉ· <text:line-break/><text:span text:style-name="T1"> </text:span><text:span text:style-name="T2">(39/24) </text:span> ⲡⲕⲱϩ· ⲡ〈ⲫ〉ⲑⲟⲛⲟⲥ· ⲟⲩⲙⲁⲥ‐ <text:line-break/><text:span text:style-name="T1"> </text:span><text:span text:style-name="T2">(39/25) </text:span> ⲧⲉ· ⲟⲩⲙⲛ̅ⲧ’ⲇⲓⲁⲃⲟⲗⲟⲥ· ϣⲱⲥ· <text:line-break/><text:span text:style-name="T1"> </text:span><text:span text:style-name="T2">(39/26) </text:span> {ϩ̅ⲓ} ⲡⲟⲗⲉⲙⲟⲥ· ⲡϭⲁⲗ̓ ⲙⲛ̅ ϩⲉⲛ‐ <text:line-break/><text:span text:style-name="T1"> </text:span><text:span text:style-name="T2">(39/27) </text:span> ϣⲟϫⲛⲉ ⲉⲩϩⲟⲟⲩ· ϩⲉⲛⲗⲩ‐ <text:line-break/><text:span text:style-name="T1"> </text:span><text:span text:style-name="T2">(39/28) </text:span> ⲡⲏ ⲙⲛ̅ ϩⲉⲛϩⲏⲇⲟⲛⲏ· ϩⲉⲛ‐ <text:line-break/><text:span text:style-name="T1"> </text:span><text:span text:style-name="T2">(39/29) </text:span> ⲙⲛ̅ⲧ’ⲉⲥⲭⲣⲟⲥ· ⲙⲛ̅ ϩⲉⲛⲧⲱ‐ <text:line-break/><text:span text:style-name="T1"> </text:span><text:span text:style-name="T2">(39/30) </text:span> ⲗⲙ̅· ϩⲉⲛⲕⲣⲟϥ ⲙⲛ̅ ϩⲉⲛϣⲱ‐ <text:line-break/><text:span text:style-name="T1"> </text:span><text:span text:style-name="T2">(39/31) </text:span> ⲛⲉ· ϩⲉⲛϩⲁⲡ’ ⲛ̅ϫⲓ ⲛϭⲟⲛⲥ̅· <text:line-break/><text:span text:style-name="T1"> </text:span><text:span text:style-name="T2">(39/32) </text:span> ⲉⲩⲕⲱ ⲉϩⲣⲁⲓ̈ ⲕⲁⲧⲁ ⲛⲉⲩ‐ <text:line-break/><text:span text:style-name="T1"> </text:span><text:span text:style-name="T2">(39/33) </text:span> ⲟⲩⲱϣⲉ· ⲉⲧⲓ ⲧⲉⲧⲛ̅ⲛ̅ⲕⲟⲧⲕ̅· <text:line-break/><text:span text:style-name="T1"> </text:span><text:span text:style-name="T2">(40/1) </text:span> ⲉⲧ̣[ⲉ]ⲧⲛ̅ⲡⲉⲣⲉ ⲣⲁⲥⲟⲩ· ⲛⲉϩⲥⲉ <text:line-break/><text:span text:style-name="T1"> </text:span><text:span text:style-name="T2">(40/2) </text:span> ⲛ̅ⲧ̣ⲉ̣ⲧⲛ̅ⲛⲟⲩⲟⲩϩ ⲧⲏⲛⲉ· ⲛ̅ⲧⲉ‐ <text:line-break/><text:span text:style-name="T1"> </text:span><text:span text:style-name="T2">(40/3) </text:span> ⲧⲛ̅ϫⲓ ϯⲡⲉ ⲛ̅ⲧⲉⲧⲛ̅ⲟⲩⲱⲙ ⲛ̅‐ <text:line-break/><text:span text:style-name="T1"> </text:span><text:span text:style-name="T2">(40/4) </text:span> ⲑⲣⲉ ⲙ̅ⲙⲉ· ϯ ⲉⲃⲟⲗ ⲙ̅ⲡⲗⲟⲅⲟⲥ <text:line-break/><text:span text:style-name="T1"> </text:span><text:span text:style-name="T2">(40/5) </text:span> ⲙⲛ̅ ⲡⲙⲟⲟⲩ ⲙ̅ⲡⲱⲛϩ̅· ⲁⲗⲱⲧⲛ̅ <text:line-break/><text:span text:style-name="T1"> </text:span><text:span text:style-name="T2">(40/6) </text:span> ϩⲛ̅ ⲛⲓⲉⲡⲓⲑⲩⲙⲓⲁ ⲉⲑⲟⲟⲩ ⲙⲛ̅ <text:line-break/><text:span text:style-name="T1"> </text:span><text:span text:style-name="T2">(40/7) </text:span> ⲛⲓⲟⲩⲱϣⲉ ⲙⲛ̅ ⲛⲓⲁⲛ→ϩ←ⲟⲙⲟⲓⲟⲛ· <text:line-break/><text:soft-page-break/><text:span text:style-name="T1"> </text:span><text:span text:style-name="T2">(40/8) </text:span> ϩⲉⲛⲙⲛ̅ⲧ’ϩⲉⲣⲉⲥⲓⲥ ⲉⲩϩⲟⲟⲩ <text:line-break/><text:span text:style-name="T1"> </text:span><text:span text:style-name="T2">(40/9) </text:span> ⲉⲙⲛ̅ⲧⲁⲩ ⲣⲁⲧⲟⲩ· ⲁⲩⲱ ⲙ̅ⲡⲉⲥ‐ <text:line-break/><text:span text:style-name="T1"> </text:span><text:span text:style-name="T2">(40/10) </text:span> ϭⲙ̅ϭⲁⲙ ⲛ̅ϭⲓ ⲧⲙⲁⲁⲩ ⲛ̅ⲧⲥⲁⲧⲉ <text:line-break/><text:span text:style-name="T1"> </text:span><text:span text:style-name="T2">(40/11) </text:span> ⲁⲥⲛ̅ ⲡⲕⲱϩⲧ̅’ ⲉϫⲛ̅ ⲧⲯⲩⲭⲏ ⲙⲛ̅ <text:line-break/><text:span text:style-name="T1"> </text:span><text:span text:style-name="T2">(40/12) </text:span> ⲡⲕⲁϩ· ⲁⲩⲱ ⲁⲥⲣⲱⲕϩ̅ ⲛ̅〈ⲛ̅〉ⲏⲉⲓ <text:line-break/><text:span text:style-name="T1"> </text:span><text:span text:style-name="T2">(40/13) </text:span> ⲧⲏⲣⲟⲩ ⲉⲧ’ϣⲟⲟⲡ’ ⲛ̅ϩⲏⲧⲥ̅· <text:line-break/><text:span text:style-name="T1"> </text:span><text:span text:style-name="T2">(40/14) </text:span> ⲁⲩⲱ ⲁⲡⲉⲥⲙⲁⲛⲉ {ⲉⲃⲟⲗ} ⲱϫⲛ̅ 〈ⲉⲃⲟⲗ〉· <text:line-break/><text:span text:style-name="T1"> </text:span><text:span text:style-name="T2">(40/15) </text:span> ⲁⲩⲱ ⲟⲛ ⲉⲥⲧⲙ̅ϭⲓⲛⲉ ⲉⲣⲱⲕϩ̅· <text:line-break/><text:span text:style-name="T1"> </text:span><text:span text:style-name="T2">(40/16) </text:span> ⲥⲛⲁⲧⲁⲕⲟⲥ ⲟⲩⲁⲁⲥ· ⲁⲩⲱ <text:line-break/><text:span text:style-name="T1"> </text:span><text:span text:style-name="T2">(40/17) </text:span> ϥⲛⲁϣⲱⲡⲉ ⲛ̅ⲁⲥⲱⲙⲁⲧⲟⲛ <text:line-break/><text:span text:style-name="T1"> </text:span><text:span text:style-name="T2">(40/18) </text:span> ⲛ̅ⲛⲁⲧⲥⲱⲙⲁ· ⲛ̅ϥⲣⲱⲕϩ̅ ⲛ̅ⲑⲩ‐ <text:line-break/><text:span text:style-name="T1"> </text:span><text:span text:style-name="T2">(40/19) </text:span> ⲗⲏ ϣⲁⲛⲧⲉϥⲣ̅ⲕⲁⲑⲁⲣⲓⲍⲉ ⲙ̅‐ <text:line-break/><text:span text:style-name="T1"> </text:span><text:span text:style-name="T2">(40/20) </text:span> ⲡⲧⲏⲣϥ̅· ⲁⲩⲱ ⲧⲕⲁϭⲓⲁ ⲧⲏⲣⲥ̅· <text:line-break/><text:span text:style-name="T1"> </text:span><text:span text:style-name="T2">(40/21) </text:span> ϩⲟⲧⲁⲛ ⲅⲁⲣ ⲉϥϣⲁⲛⲧⲛ̅ⲧⲙ̅ϭⲛ̅ <text:line-break/><text:span text:style-name="T1"> </text:span><text:span text:style-name="T2">(40/22) </text:span> ⲗⲁⲁⲩ ⲉⲣⲱⲕϩ̅· ϥⲛⲁⲛⲟⲟⲩϩϥ̅ <text:line-break/><text:span text:style-name="T1"> </text:span><text:span text:style-name="T2">(40/23) </text:span> ⲉⲣⲟϥ ⲟⲩⲁⲁϥ ϣⲁⲛⲧⲉϥⲟϫⲛϥ· <text:line-break/><text:span text:style-name="T1"> </text:span><text:span text:style-name="T2">(40/24) </text:span> ⲧⲟⲧⲉ ϩⲙ̅ ⲡⲉⲓ̈ⲁⲓⲱⲛ ⲉⲧⲉ ⲡⲁⲓ̈ <text:line-break/><text:span text:style-name="T1"> </text:span><text:span text:style-name="T2">(40/25) </text:span> ⲡⲉ ⲙ̅ⲯⲩⲭⲓⲕⲟⲛ· ϥⲛⲁϣⲱ‐ <text:line-break/><text:span text:style-name="T1"> </text:span><text:span text:style-name="T2">(40/26) </text:span> ⲡⲉ ⲛ̅ϭⲓ ⲡⲣⲱⲙⲉ ⲉⲧⲉ ⲡⲉⲧ’‐ <text:line-break/><text:span text:style-name="T1"> </text:span><text:span text:style-name="T2">(40/27) </text:span> ⲥⲟⲟⲩⲛ ⲡⲉ ⲛ̅ⲧⲛⲟϭ ⲛ̅ϭⲟⲙ· <text:line-break/><text:span text:style-name="T1"> </text:span><text:span text:style-name="T2">(40/28) </text:span> ϥⲁϫⲉⲓ ⲁⲩⲱ ϥⲁⲥⲟⲩⲱⲛⲧ̅’· <text:line-break/><text:span text:style-name="T1"> </text:span><text:span text:style-name="T2">(40/29) </text:span> ϥⲁⲥⲱ ⲉⲃⲟⲗ ⲙ̅ⲡⲉⲣⲱⲧⲉ ⲛ̅‐ <text:line-break/><text:span text:style-name="T1"> </text:span><text:span text:style-name="T2">(40/30) </text:span> ⲧⲙⲁⲁⲩ ⲙ̅ⲫⲱⲃ· ϥⲁϣⲁϫⲉ <text:line-break/><text:span text:style-name="T1"> </text:span><text:span text:style-name="T2">(40/31) </text:span> ϩⲛ̅ ϩⲉⲛⲡⲁⲣⲁⲃⲟⲗⲏ· ϥⲁⲧⲁ‐ <text:line-break/><text:span text:style-name="T1"> </text:span><text:span text:style-name="T2">(40/32) </text:span> ϣⲉ ⲟⲉⲓϣ ⲙ̅ⲡⲁⲓⲱⲛ ⲉⲧ’ⲛ̅ⲛⲏ‐ <text:line-break/><text:span text:style-name="T1"> </text:span><text:span text:style-name="T2">(41/1) </text:span> ⲟⲩ· ⲛ̅ⲑⲉ ⲉⲧⲁϥϣⲁϫⲉ ϩ̣ⲙ̅ <text:line-break/><text:span text:style-name="T1"> </text:span><text:span text:style-name="T2">(41/2) </text:span> ⲡϣⲟⲣⲡ̅’ ⲛ̅ⲁⲓⲱⲛ ⲛ̅ⲧⲉ ⲧⲥⲁ‐ <text:line-break/><text:span text:style-name="T1"> </text:span><text:span text:style-name="T2">(41/3) </text:span> ⲣⲁⲝ ⲛ̅ⲛⲱϩⲉ· ⲁⲩⲱ ⲉⲧⲃⲉ <text:line-break/><text:span text:style-name="T1"> </text:span><text:span text:style-name="T2">(41/4) </text:span> ⲛⲉϥϣⲁϫⲉ ⲉⲧⲉ ϥϫⲱ ⲙ̅ⲙⲟⲟⲩ· <text:line-break/><text:span text:style-name="T1"> </text:span><text:span text:style-name="T2">(41/5) </text:span> ⲁϥϣⲁϫⲉ ⲛ̅ϩⲏⲧⲟⲩ ⲧⲏⲣⲟⲩ <text:line-break/><text:span text:style-name="T1"> </text:span><text:span text:style-name="T2">(41/6) </text:span> ϩⲛ̅ ϣⲃⲉ ⲥⲛⲟⲟⲩⲥ ⲛ̅ⲗⲁⲥ· <text:line-break/><text:span text:style-name="T1"> </text:span><text:span text:style-name="T2">(41/7) </text:span> ⲁⲩⲱ ⲁϥⲟⲩⲱⲛ ⲉⲛⲡⲩⲗⲏ <text:line-break/><text:span text:style-name="T1"> </text:span><text:span text:style-name="T2">(41/8) </text:span> ⲛ̅ⲛⲙ̅ⲡⲏⲟⲩⲉ ϩⲛ̅ ⲛⲉϥϣⲁ‐ <text:line-break/><text:span text:style-name="T1"> </text:span><text:span text:style-name="T2">(41/9) </text:span> ϫⲉ· ⲁⲩⲱ ⲁϥϯ ϣⲓⲡⲉ ⲙ̅ⲡⲁⲓ̈ <text:line-break/><text:span text:style-name="T1"> </text:span><text:span text:style-name="T2">(41/10) </text:span> ⲉⲧ’{ϩ̅ⲓ}ϫⲛ̅ ⲉⲙⲛ̅ⲧⲉ· ⲁϥⲧⲟⲩ‐ <text:line-break/><text:span text:style-name="T1"> </text:span><text:span text:style-name="T2">(41/11) </text:span> ⲛⲟⲥ ⲛⲉⲧ’ⲙⲟⲟⲩⲧ’· ⲁⲩⲱ <text:line-break/><text:span text:style-name="T1"> </text:span><text:span text:style-name="T2">(41/12) </text:span> ⲧⲉϥⲙⲛ̅ⲧ’ϫⲟⲉⲓⲥ ⲁϥⲃⲁⲗⲉ〈ⲥ〉 <text:line-break/><text:span text:style-name="T1"> </text:span><text:span text:style-name="T2">(41/13) </text:span> ⲉⲃⲟⲗ· ⲧⲟⲧⲉ ⲁⲩⲛⲟϭ ⲛ̅ϣⲧⲟⲣ‐ <text:line-break/><text:span text:style-name="T1"> </text:span><text:span text:style-name="T2">(41/14) </text:span> ⲧⲣ̅ ϣⲱⲡⲉ· ⲁⲩⲧⲱⲱⲛ ⲉϩⲣⲁⲓ̈ <text:line-break/><text:span text:style-name="T1"> </text:span><text:span text:style-name="T2">(41/15) </text:span> ⲉϫⲱϥ ⲛ̅ϭⲓ ⲛ̅ⲁⲣⲭⲱⲛ ⲛ̅ⲧⲟⲩ‐ <text:line-break/><text:span text:style-name="T1"> </text:span><text:span text:style-name="T2">(41/16) </text:span> ⲃⲗ̅ⲕⲉ· ⲁⲩⲟⲩⲱϣⲉ ⲉⲧⲁⲁϥ <text:line-break/><text:span text:style-name="T1"> </text:span><text:span text:style-name="T2">(41/17) </text:span> ⲉⲧⲟⲟⲧϥ̅ ⲙ̅ⲡⲉⲧ’{ϩ̅ⲓ}ϫⲛ̅ ⲉⲙⲛ̅‐ <text:line-break/><text:span text:style-name="T1"> </text:span><text:span text:style-name="T2">(41/18) </text:span> ⲧⲉ· ⲧⲟⲧⲉ ⲟⲩⲁ ⲉⲃⲟⲗ ϩⲛ̅ <text:line-break/><text:span text:style-name="T1"> </text:span><text:span text:style-name="T2">(41/19) </text:span> ⲛⲉⲧ’ⲟⲩⲏϩ ⲛ̅ⲥⲱϥ ⲁⲩⲥⲟⲩ‐ <text:line-break/><text:span text:style-name="T1"> </text:span><text:span text:style-name="T2">(41/20) </text:span> ⲱⲛϥ̅· ⲁⲩⲕⲱϩⲧ̅’ ϫⲓ ⲉⲧⲉϥ‐ <text:line-break/><text:span text:style-name="T1"> </text:span><text:span text:style-name="T2">(41/21) </text:span> ⲯⲩⲭⲏ ⲁϥⲣ̅ⲡⲁⲣⲁⲇⲓⲇⲟⲩ <text:line-break/><text:span text:style-name="T1"> </text:span><text:span text:style-name="T2">(41/22) </text:span> ⲙ̅ⲙⲟϥ· ⲉⲙⲡⲉⲗⲁⲁⲩ ⲥⲟⲩ‐ <text:line-break/><text:soft-page-break/><text:span text:style-name="T1"> </text:span><text:span text:style-name="T2">(41/23) </text:span> ⲱⲛϥ̅· ⲁⲩⲉⲓⲣⲉ ⲁⲩⲁⲙⲁϩⲧⲉ <text:line-break/><text:span text:style-name="T1"> </text:span><text:span text:style-name="T2">(41/24) </text:span> ⲙ̅ⲙⲟϥ· ⲁⲩⲉⲓⲛⲉ ⲉϩⲣⲁⲓ̈ ⲉⲣⲟ‐ <text:line-break/><text:span text:style-name="T1"> </text:span><text:span text:style-name="T2">(41/25) </text:span> ⲟⲩ ⲛ̅ⲟⲩϩⲁⲡ’ ⲟⲩⲁⲁⲩ· <text:line-break/><text:span text:style-name="T1"> </text:span><text:span text:style-name="T2">(41/26) </text:span> ⲁⲩⲱ ⲁⲩⲣ̅ⲡⲁⲣⲁⲇⲓⲇⲟⲩ ⲙ̅‐ <text:line-break/><text:span text:style-name="T1"> </text:span><text:span text:style-name="T2">(41/27) </text:span> ⲙⲟϥ ⲉϩⲣⲁⲓ̈ ⲉⲧⲟⲟⲧϥ̅ ⲙ̅ⲡⲉⲧ’‐ <text:line-break/><text:span text:style-name="T1"> </text:span><text:span text:style-name="T2">(41/28) </text:span> {ϩ̅ⲓ}ϫⲛ̅ ⲉⲙⲛ̅ⲧⲉ· ⲁⲩⲱ ⲁⲩⲧⲁ‐ <text:line-break/><text:span text:style-name="T1"> </text:span><text:span text:style-name="T2">(41/29) </text:span> ⲁϥ ⲉⲧⲟⲟⲧϥ̅ ⲛ̅ⲥ̅ⲁ̅ⲥ̅ⲁⲃⲉⲕ̅ <text:line-break/><text:span text:style-name="T1"> </text:span><text:span text:style-name="T2">(41/30) </text:span> ⲁϩⲉⲛⲃ̅ⲉ̅ⲣ̅ⲱ̅ⲧ̅ ⲑ̅· ⲁϥⲥⲃ̅ⲧⲱ‐ <text:line-break/><text:span text:style-name="T1"> </text:span><text:span text:style-name="T2">(41/31) </text:span> ⲧϥ̅ ⲉⲧⲣⲉϥⲃⲱⲕ ⲉⲡⲓⲧⲛ̅ ⲛ̅ϥ‐ <text:line-break/><text:span text:style-name="T1"> </text:span><text:span text:style-name="T2">(41/32) </text:span> ⲣ̅ⲉⲗⲉⲅ’ⲭⲉ ⲙ̅ⲙⲟⲟⲩ· ⲧⲟⲧⲉ <text:line-break/><text:span text:style-name="T1"> </text:span><text:span text:style-name="T2">(41/33) </text:span> ⲡⲉⲧ’{ϩ̅ⲓ}ϫⲛ̅ ⲉⲙⲛ̅ⲧⲉ ⲁϥϫⲓⲧϥ̅· <text:line-break/><text:span text:style-name="T1"> </text:span><text:span text:style-name="T2">(42/1) </text:span> ⲁⲩⲱ ⲡⲧⲣⲟⲡⲟⲥ ⲛ̅ⲧⲉϥⲥⲁⲣⲁⲝ <text:line-break/><text:span text:style-name="T1"> </text:span><text:span text:style-name="T2">(42/2) </text:span> ⲙ̅ⲡⲉ̣ϥϭⲛ̅ⲧϥ̅ ⲁⲉⲙⲁϩⲧⲉ ⲙ̅ⲙⲟϥ <text:line-break/><text:span text:style-name="T1"> </text:span><text:span text:style-name="T2">(42/3) </text:span> ⲉⲧⲣⲉϥⲟⲩⲟⲛϩϥ̅ ⲉⲃⲟⲗ ⲛ̅ⲛ̅ⲁⲣⲭⲱ̅· <text:line-break/><text:span text:style-name="T1"> </text:span><text:span text:style-name="T2">(42/4) </text:span> ⲁⲗⲗⲁ ⲛⲉϥϫⲱ ⲙ̅ⲙⲟⲥ ϫⲉ ⲛⲓⲙ ⲡⲉ <text:line-break/><text:span text:style-name="T1"> </text:span><text:span text:style-name="T2">(42/5) </text:span> ⲡⲁⲓ̈· ⲟⲩⲟⲩ ⲡⲉ· ⲁⲡⲉϥⲗⲟⲅⲟⲥ <text:line-break/><text:span text:style-name="T1"> </text:span><text:span text:style-name="T2">(42/6) </text:span> ⲃⲱⲗ ⲉⲃⲟⲗ ⲙ̅ⲡⲛⲟⲙⲟⲥ ⲙ̅ⲡⲁⲓⲱⲛ· <text:line-break/><text:span text:style-name="T1"> </text:span><text:span text:style-name="T2">(42/7) </text:span> ⲟⲩⲉⲃⲟⲗ ϩⲙ̅ ⲡⲗⲟⲅⲟⲥ ⲡⲉ ⲛ̅ⲧϭⲟⲙ <text:line-break/><text:span text:style-name="T1"> </text:span><text:span text:style-name="T2">(42/8) </text:span> ⲙ̅ⲡⲱⲛϩ̅· ⲁⲩⲱ ⲁϥϫⲣⲟ ⲉⲡⲟⲩ‐ <text:line-break/><text:span text:style-name="T1"> </text:span><text:span text:style-name="T2">(42/9) </text:span> ⲁϩ ⲥⲁϩⲛⲉ ⲛ̅ⲛ̅ⲁⲣⲭⲱⲛ· ⲁⲩⲱ <text:line-break/><text:span text:style-name="T1"> </text:span><text:span text:style-name="T2">(42/10) </text:span> ⲙ̅ⲡⲟⲩϣϭⲙ̅ϭⲟⲙ ⲉⲡⲟⲩϩⲱⲃ <text:line-break/><text:span text:style-name="T1"> </text:span><text:span text:style-name="T2">(42/11) </text:span> ⲉⲣ̅ ϫⲟⲉⲓⲥ ⲉϫⲱϥ· ⲁⲛⲁⲣⲭⲱⲛ <text:line-break/><text:span text:style-name="T1"> </text:span><text:span text:style-name="T2">(42/12) </text:span> ⲕⲱⲧⲉ ⲛ̅ⲥⲁ ⲡⲉⲛⲧⲁϥϣⲱⲡⲉ <text:line-break/><text:span text:style-name="T1"> </text:span><text:span text:style-name="T2">(42/13) </text:span> ⲙ̅ⲡⲟⲩⲙ̅ⲙⲉ ϫⲉ ⲡⲁⲓ̈ ⲡⲉ ⲡⲥⲏ‐ <text:line-break/><text:span text:style-name="T1"> </text:span><text:span text:style-name="T2">(42/14) </text:span> ⲙⲉⲓⲟⲛ ⲙ̅ⲡⲟⲩⲃⲱⲗ ⲉⲃⲟⲗ· ⲁⲩⲱ <text:line-break/><text:span text:style-name="T1"> </text:span><text:span text:style-name="T2">(42/15) </text:span> ⲡϣⲓⲃⲉ ⲙ̅ⲡⲁⲓⲱⲛ ⲡⲉ· ⲁⲡⲣⲏ <text:line-break/><text:span text:style-name="T1"> </text:span><text:span text:style-name="T2">(42/16) </text:span> ϩⲱⲧⲡ̅’ ⲙ̅ⲫⲟⲟⲩ· ⲁⲡϩⲟⲟⲩ <text:line-break/><text:span text:style-name="T1"> </text:span><text:span text:style-name="T2">(42/17) </text:span> ⲣ̅ ⲕⲁⲕⲉ· ⲁⲛⲇⲁⲓⲙⲟⲛⲓⲟⲛ ϣⲧⲟⲣ‐ <text:line-break/><text:span text:style-name="T1"> </text:span><text:span text:style-name="T2">(42/18) </text:span> ⲧⲣ̅· ⲁⲩⲱ ⲙⲛ̅ⲛ̅ⲥⲁ ⲛⲁⲓ̈ ϥⲛⲁⲟⲩ‐ <text:line-break/><text:span text:style-name="T1"> </text:span><text:span text:style-name="T2">(42/19) </text:span> ⲱⲛϩ̅ ⲉⲃⲟⲗ ⲉϥⲙⲟⲟϣⲉ ⲉϩⲣⲁⲓ̈· <text:line-break/><text:span text:style-name="T1"> </text:span><text:span text:style-name="T2">(42/20) </text:span> ⲁⲩⲱ ϥⲛⲁⲟⲩⲱⲛϩ̅ ⲉⲃⲟⲗ ⲛ̅ϭⲓ <text:line-break/><text:span text:style-name="T1"> </text:span><text:span text:style-name="T2">(42/21) </text:span> ⲡⲥⲏⲙⲉⲓⲟⲛ ⲙ̅ⲡⲁⲓⲱⲛ ⲉⲧⲛⲏ‐ <text:line-break/><text:span text:style-name="T1"> </text:span><text:span text:style-name="T2">(42/22) </text:span> ⲟⲩ· ⲁⲩⲱ ⲥⲉⲛⲁⲟⲩⲱⲧϩ̅ ⲉⲃⲟⲗ <text:line-break/><text:span text:style-name="T1"> </text:span><text:span text:style-name="T2">(42/23) </text:span> ⲛ̅ϭⲓ ⲛⲁⲓⲱⲛ· ⲁⲩⲱ ⲥⲉⲛⲁϣⲱ‐ <text:line-break/><text:span text:style-name="T1"> </text:span><text:span text:style-name="T2">(42/24) </text:span> ⲡⲉ ⲙ̅ⲙⲁⲕⲁⲣⲓⲟⲥ ⲛ̅ϭⲓ ⲛⲁⲓ̈ ⲉⲧⲛⲁ‐ <text:line-break/><text:span text:style-name="T1"> </text:span><text:span text:style-name="T2">(42/25) </text:span> ⲣ̅ⲛⲟⲉⲓ ⲛ̅ⲛⲁⲓ̈ ⲉⲧⲟⲩϣⲁϫⲉ <text:line-break/><text:span text:style-name="T1"> </text:span><text:span text:style-name="T2">(42/26) </text:span> ⲛⲙ̅ⲙⲁⲩ ⲉⲣⲟⲟⲩ· ⲁⲩⲱ ⲥⲉ‐ <text:line-break/><text:span text:style-name="T1"> </text:span><text:span text:style-name="T2">(42/27) </text:span> ⲛⲁⲟⲩⲟⲛϩⲟⲩ ⲉⲃⲟⲗ· ⲁⲩⲱ ⲛ̅‐ <text:line-break/><text:span text:style-name="T1"> </text:span><text:span text:style-name="T2">(42/28) </text:span> ⲥⲉϣⲱⲡⲉ ⲙ̅ⲙⲁⲕⲁⲣⲓⲟⲥ· ϫⲉ <text:line-break/><text:span text:style-name="T1"> </text:span><text:span text:style-name="T2">(42/29) </text:span> ⲥⲉⲛⲁϣⲱⲡⲉ ⲉⲩⲣ̅ⲛⲟⲉⲓ ⲛ̅ⲧⲙⲉ· <text:line-break/><text:span text:style-name="T1"> </text:span><text:span text:style-name="T2">(42/30) </text:span> ϫⲉ ⲁⲧⲉⲧⲛ̅ⲁⲛⲁⲡⲁⲩ{ⲣ}ⲉ ⲉϩⲣⲁⲓ̈ <text:line-break/><text:span text:style-name="T1"> </text:span><text:span text:style-name="T2">(42/31) </text:span> ⲁⲛⲡⲏⲟⲩⲉ· ⲧⲟⲧⲉ ⲟⲩⲛ̅ ϩⲁϩ <text:line-break/><text:span text:style-name="T1"> </text:span><text:span text:style-name="T2">(42/32) </text:span> ⲛⲁⲟⲩⲱϩ ⲛ̅ⲥⲱϥ· ⲁⲩⲱ ⲉⲩⲛⲁ‐ <text:line-break/><text:span text:style-name="T1"> </text:span><text:span text:style-name="T2">(42/33) </text:span> ⲣ̅ⲉⲛⲉⲣⲅⲉⲓ ϩⲛ̅ ⲛ̅ⲧⲟⲡⲟⲥ ⲛ̅ⲛⲟⲩ‐ <text:line-break/><text:span text:style-name="T1"> </text:span><text:span text:style-name="T2">(42/34) </text:span> ϫⲡⲟ· <text:line-break/><text:span text:style-name="T1"> </text:span><text:span text:style-name="T2">(43/1) </text:span> ⲥⲉⲛⲁⲙⲟⲟϣⲉ ⲥⲉⲛⲁⲕⲱ ⲉϩⲣⲁⲓ̈ <text:line-break/><text:span text:style-name="T1"> </text:span><text:span text:style-name="T2">(43/2) </text:span> ⲛ̅ⲛⲉϥϣⲁϫⲉ ⲕⲁⲧⲁ ⲡ〈ⲟⲩ〉ⲟⲩⲱϣⲉ <text:line-break/><text:soft-page-break/><text:span text:style-name="T1"> </text:span><text:span text:style-name="T2">(43/3) </text:span> ⲁⲛⲁⲩ ϫⲉ ⲁⲩⲟⲩⲉⲓⲛⲉ ⲛ̅ϭⲓ ⲛⲓⲁⲓ‐ <text:line-break/><text:span text:style-name="T1"> </text:span><text:span text:style-name="T2">(43/4) </text:span> ⲱⲛ ⲉⲧⲉ ⲛⲁⲓ̈ ⲛⲉ· ϫⲉ ⲟⲩⲁϣ <text:line-break/><text:span text:style-name="T1"> </text:span><text:span text:style-name="T2">(43/5) </text:span> ⲛ̅{ⲁ}ⲙⲁⲉⲓⲏ ⲡⲉ ⲡⲉϥⲙⲟⲟⲩ ⲛ̅‐ <text:line-break/><text:span text:style-name="T1"> </text:span><text:span text:style-name="T2">(43/6) </text:span> ⲧⲉ ⲡⲓⲁⲓⲱⲛ ⲉⲧⲙ̅ⲙⲁⲩ ⲉⲧⲁϩ‐ <text:line-break/><text:span text:style-name="T1"> </text:span><text:span text:style-name="T2">(43/7) </text:span> ⲟⲩⲱⲧϩ̅ ⲉⲃⲟⲗ· ϫⲉ ϩⲉⲛⲁⲓⲱⲛ <text:line-break/><text:span text:style-name="T1"> </text:span><text:span text:style-name="T2">(43/8) </text:span> ⲛ̅ⲁϣ ⲛ̅ⲁⲉⲓⲏ ⲛⲉ· ϫⲉ ⲁϣ ⲧⲉ <text:line-break/><text:span text:style-name="T1"> </text:span><text:span text:style-name="T2">(43/9) </text:span> ⲑⲉ ⲉⲧⲉ ⲛ̅ⲣⲱⲙⲉ ⲛⲁⲥⲃ̅ⲧⲱⲧⲟⲩ <text:line-break/><text:span text:style-name="T1"> </text:span><text:span text:style-name="T2">(43/10) </text:span> ⲛ̅ⲥⲉⲁϩⲉⲣⲁⲧⲟⲩ· ⲛ̅ⲥⲉϣⲱⲡⲉ <text:line-break/><text:span text:style-name="T1"> </text:span><text:span text:style-name="T2">(43/11) </text:span> ⲛ̅ⲁⲓⲱⲛ ⲛ̅ⲁⲧ’ⲱϫⲛ̅· ϣⲟⲣⲡ̅’ ⲇⲉ <text:line-break/><text:span text:style-name="T1"> </text:span><text:span text:style-name="T2">(43/12) </text:span> ⲙⲛ̅ⲛ̅ⲥⲁ ⲡⲉϥⲧⲁϣⲉ ⲟⲉⲓϣ· <text:line-break/><text:span text:style-name="T1"> </text:span><text:span text:style-name="T2">(43/13) </text:span> ⲉϥⲧⲁϣⲉ ⲟⲉⲓϣ ⲙ̅ⲡⲙⲁϩ ⲛ̅ⲁⲓ‐ <text:line-break/><text:span text:style-name="T1"> </text:span><text:span text:style-name="T2">(43/14) </text:span> ⲱⲛ ⲥⲛⲁⲩ· ⲁⲩⲱ ⲡϣⲟⲣⲡ̅’· <text:line-break/><text:span text:style-name="T1"> </text:span><text:span text:style-name="T2">(43/15) </text:span> ⲁⲩⲱ ⲡϣⲟⲣⲡ̅’ ⲛ̅ⲁⲓⲱⲛ ϣⲁ‐ <text:line-break/><text:span text:style-name="T1"> </text:span><text:span text:style-name="T2">(43/16) </text:span> ⲣⲉϥⲱϫⲛ̅ {ϩ̅ⲓ}ⲧⲙ̅ ⲡⲟⲩⲁⲉⲓϣ· <text:line-break/><text:span text:style-name="T1"> </text:span><text:span text:style-name="T2">(43/17) </text:span> ⲁϥⲣ̅ ⲡϣⲟⲣⲡ̅’ ⲛ̅ⲁⲓⲱⲛ ⲉϥⲙⲟ‐ <text:line-break/><text:span text:style-name="T1"> </text:span><text:span text:style-name="T2">(43/18) </text:span> ⲟϣⲉ ⲛ̅ϩⲏⲧϥ̅· ϣⲁⲛⲧⲉϥⲱϫⲛ̅ <text:line-break/><text:span text:style-name="T1"> </text:span><text:span text:style-name="T2">(43/19) </text:span> ⲉϥⲧⲁϣⲉ ⲟⲉⲓϣ ⲛ̅ϣⲉ ϫⲟⲩⲱ‐ <text:line-break/><text:span text:style-name="T1"> </text:span><text:span text:style-name="T2">(43/20) </text:span> ⲧⲉ ⲛ̅ⲣⲟⲙⲡⲉ ⲛ̅ⲏⲡⲉ· ⲉⲧⲉ <text:line-break/><text:span text:style-name="T1"> </text:span><text:span text:style-name="T2">(43/21) </text:span> ⲡⲁⲉⲓ ⲡⲉ ⲡⲁⲣⲓⲑⲙⲟⲥ <text:line-break/><text:span text:style-name="T1"> </text:span><text:span text:style-name="T2">(43/22) </text:span> ⲛ̅ⲧⲉⲗⲉⲓⲟⲥ ⲉⲧ’ϫⲟⲥⲉ ⲙ̅ⲡϣⲁ· <text:line-break/><text:span text:style-name="T1"> </text:span><text:span text:style-name="T2">(43/23) </text:span> ⲁϥⲉⲓⲣⲉ ⲙ̅ⲡⲧⲁⲡ’ ⲙ̅ⲡ〈ⲥ〉ⲁ ⲛ̅‐ <text:line-break/><text:span text:style-name="T1"> </text:span><text:span text:style-name="T2">(43/24) </text:span> ϩⲱⲧⲡ̅’ ⲛ̅ϫⲁⲉⲓⲉ· ⲁⲩⲱ ⲁϥ‐ <text:line-break/><text:span text:style-name="T1"> </text:span><text:span text:style-name="T2">(43/25) </text:span> ⲧⲁⲕⲟ ⲛ̅ⲧⲁⲛⲁⲧⲟⲗⲏ· ⲧⲟⲧⲉ <text:line-break/><text:span text:style-name="T1"> </text:span><text:span text:style-name="T2">(43/26) </text:span> ⲡⲉⲕⲥⲡⲉⲣⲙⲁ ⲙⲛ̅ ⲛⲉⲧ’ⲟⲩ‐ <text:line-break/><text:span text:style-name="T1"> </text:span><text:span text:style-name="T2">(43/27) </text:span> ⲱϣⲉ ⲉⲙⲟⲟϣⲉ ⲛ̅ⲥⲁ ⲡⲉⲛ‐ <text:line-break/><text:span text:style-name="T1"> </text:span><text:span text:style-name="T2">(43/28) </text:span> ⲛⲟϭ ⲛ̅ⲗⲟⲅⲟⲥ ⲙⲛ̅ ⲡⲉϥⲧⲁϣⲉ <text:line-break/><text:span text:style-name="T1"> </text:span><text:span text:style-name="T2">(43/29) </text:span> ⲟⲉⲓϣ· ⲧⲟⲧⲉ ⲁⲧⲃⲗ̅ⲕⲉ ⲛ̅ⲛ̅ⲁⲣ‐ <text:line-break/><text:span text:style-name="T1"> </text:span><text:span text:style-name="T2">(43/30) </text:span> ⲭⲱⲛ ϫⲉⲣⲟ· ⲁⲩϫⲓ ϣⲓⲡⲉ ⲉ‐ <text:line-break/><text:span text:style-name="T1"> </text:span><text:span text:style-name="T2">(43/31) </text:span> ϩⲣⲁⲓ̈ ⲉϫⲙ̅ ⲡⲟⲩⲃⲱⲗ ⲉⲃⲟⲗ· <text:line-break/><text:span text:style-name="T1"> </text:span><text:span text:style-name="T2">(43/32) </text:span> ⲁⲩⲱ ⲁⲩⲟⲩⲱϣⲉ ⲁⲩⲃⲱⲗⲕ̅ <text:line-break/><text:span text:style-name="T1"> </text:span><text:span text:style-name="T2">(43/33) </text:span> ⲉⲡⲱⲛϩ̅· ⲁⲛⲡⲟⲗⲓⲥ ϣⲟⲣ〈ϣ〉ⲣ̅ <text:line-break/><text:span text:style-name="T1"> </text:span><text:span text:style-name="T2">(43/34) </text:span> ⲁⲛⲧⲟⲟⲩ ⲃⲱⲗ ⲉⲃⲟⲗ· ⲁϥ{ⲉ̅ⲓ} <text:line-break/><text:span text:style-name="T1"> </text:span><text:span text:style-name="T2">(43/35) </text:span> ⲉϩⲣⲁⲓ̈ ⲛ̅ϭⲓ ⲡⲁⲣⲭⲱⲛ ⲙⲛ̅ ⲛ̅‐ <text:line-break/><text:span text:style-name="T1"> </text:span><text:span text:style-name="T2">(44/1) </text:span> ⲁⲣⲭ̣ⲱⲛ ⲛ̅ⲛ̅ⲙⲁ ⲛ̅ϩⲱⲧⲡ̅ ϣⲁ <text:line-break/><text:span text:style-name="T1"> </text:span><text:span text:style-name="T2">(44/2) </text:span> ⲧⲁⲛⲁⲧⲟⲗⲏ· ϫⲉ ⲡⲧⲟⲡⲟⲥ ⲉⲧⲙ̅‐ <text:line-break/><text:span text:style-name="T1"> </text:span><text:span text:style-name="T2">(44/3) </text:span> ⲙⲁⲩ ⲉⲧⲁⲡⲗⲟⲅⲟⲥ ⲟⲩⲱⲛϩ̅ <text:line-break/><text:span text:style-name="T1"> </text:span><text:span text:style-name="T2">(44/4) </text:span> ⲉⲃⲟⲗ ⲛ̅ϩⲏⲧϥ̅ ⲛ̅ϣⲟⲣⲡ̅’· ⲧⲟⲧⲉ <text:line-break/><text:span text:style-name="T1"> </text:span><text:span text:style-name="T2">(44/5) </text:span> ⲁⲡⲕⲁϩ ⲕⲓⲙ· ⲁⲩⲱ ⲁⲛⲡⲟⲗⲓⲥ <text:line-break/><text:span text:style-name="T1"> </text:span><text:span text:style-name="T2">(44/6) </text:span> ϣⲧⲟⲣⲧⲣ̅· ⲧⲟⲧⲉ ⲁⲛϩⲁⲗⲁⲧⲉ <text:line-break/><text:span text:style-name="T1"> </text:span><text:span text:style-name="T2">(44/7) </text:span> ⲟⲩⲱⲙ· ⲁⲩⲱ ⲁⲩⲥⲉⲓ ⲉⲃⲟⲗ <text:line-break/><text:span text:style-name="T1"> </text:span><text:span text:style-name="T2">(44/8) </text:span> ϩⲛ̅ ⲛⲟⲩⲡⲉⲧ’ⲙⲟⲟⲩⲧ’· ⲁⲡⲕⲁϩ <text:line-break/><text:span text:style-name="T1"> </text:span><text:span text:style-name="T2">(44/9) </text:span> ⲣ̅ⲡⲉⲛⲑⲉⲓ ⲙⲛ̅ ⲧⲟⲓⲕⲟⲩⲙⲉⲛⲏ <text:line-break/><text:span text:style-name="T1"> </text:span><text:span text:style-name="T2">(44/10) </text:span> ⲁⲩⲣ̅ ϫⲁⲉⲓⲉ· ⲧⲟⲧⲉ ⲛ̅ⲧⲁⲣⲉⲛ̅‐ <text:line-break/><text:span text:style-name="T1"> </text:span><text:span text:style-name="T2">(44/11) </text:span> ⲭⲣⲟⲛⲟⲥ ϫⲱⲕ· ⲧⲟⲧⲉ ⲁⲧⲕⲁϭⲓⲁ <text:line-break/><text:span text:style-name="T1"> </text:span><text:span text:style-name="T2">(44/12) </text:span> ϫⲓⲥⲉ ⲉⲙⲁⲧⲉ· ⲁⲩⲱ ϣⲁⲑⲁⲏ <text:line-break/><text:span text:style-name="T1"> </text:span><text:span text:style-name="T2">(44/13) </text:span> ⲙ̅ⲡⲧⲉⲗⲟⲥ ⲙ̅ⲡⲗⲟⲅⲟⲥ· ⲧⲟⲧⲉ <text:line-break/><text:span text:style-name="T1"> </text:span><text:span text:style-name="T2">(44/14) </text:span> ⲁϥⲧⲱⲱⲛ ⲛ̅ϭⲓ ⲡⲁⲣⲭⲱⲛ ⲛ̅ⲛ̅ⲥⲁ <text:line-break/><text:soft-page-break/><text:span text:style-name="T1"> </text:span><text:span text:style-name="T2">(44/15) </text:span> ⲛ̅ϩⲱⲧⲡ̅’· ⲁⲩⲱ ⲉⲃⲟⲗ ϩⲛ̅ ⲧⲁⲛⲁ‐ <text:line-break/><text:span text:style-name="T1"> </text:span><text:span text:style-name="T2">(44/16) </text:span> ⲧⲟⲗⲏ ⲉϥⲛⲁⲣ̅ ⲟⲩϩⲱⲃ ⲛ̅ϥϯ ⲥⲃⲱ <text:line-break/><text:span text:style-name="T1"> </text:span><text:span text:style-name="T2">(44/17) </text:span> ⲛ̅ⲛ̅ⲣⲱⲙⲉ ⲉϩⲟⲩⲛ ⲉⲧⲉϥⲕⲁϭⲓⲁ· <text:line-break/><text:span text:style-name="T1"> </text:span><text:span text:style-name="T2">(44/18) </text:span> ⲁⲩⲱ ⲉϥⲟⲩⲱϣ ⲉⲃⲱⲗ ⲉⲃⲟⲗ <text:line-break/><text:span text:style-name="T1"> </text:span><text:span text:style-name="T2">(44/19) </text:span> ⲛ̅ⲥⲃⲱ ⲛⲓⲙ ⲛ̅ⲗⲟⲅⲟⲥ →ⲛ̅ⲥⲟⲫⲓⲁ← ⲛ̅ⲧⲉ ⲧⲙⲉ· <text:line-break/><text:span text:style-name="T1"> </text:span><text:span text:style-name="T2">(44/20) </text:span> ⲉϥⲙⲉ ⲛ̅ⲧⲥⲟⲫⲓⲁ ⲛ̅ϭⲟⲗ· ⲁϥϩⲟⲩ <text:line-break/><text:span text:style-name="T1"> </text:span><text:span text:style-name="T2">(44/21) </text:span> ⲧⲟⲟⲧϥ̅ ⲅⲁⲣ ⲉⲡⲁⲣⲭⲁⲓⲟⲛ ⲉϥⲟⲩ‐ <text:line-break/><text:span text:style-name="T1"> </text:span><text:span text:style-name="T2">(44/22) </text:span> ⲱϣⲉ ⲉⲉⲓⲛⲉ ⲉϩⲟⲩⲛ ⲛ̅ⲧⲕⲁ‐ <text:line-break/><text:span text:style-name="T1"> </text:span><text:span text:style-name="T2">(44/23) </text:span> ϭⲓⲁ ⲛ̅ϥϯ {ϩ̅ⲓ}ⲱⲱϥ ⲛ̅ⲟⲩⲙⲛ̅ⲧ’‐ <text:line-break/><text:span text:style-name="T1"> </text:span><text:span text:style-name="T2">(44/24) </text:span> ⲥⲉⲙⲛⲟⲥ· ⲙ̅ⲡⲉϥϭⲙ̅ϭⲟⲙ̓ <text:line-break/><text:span text:style-name="T1"> </text:span><text:span text:style-name="T2">(44/25) </text:span> ⲉⲃⲟⲗ ϫⲉ ⲛⲁϣⲉ ⲡⲉϥϫⲱϩⲙ̅ <text:line-break/><text:span text:style-name="T1"> </text:span><text:span text:style-name="T2">(44/26) </text:span> {ⲙ}ⲛ̅ⲛⲉϥⲉⲛⲇⲩⲙⲁ· ⲧⲟⲧⲉ ⲁϥ‐ <text:line-break/><text:span text:style-name="T1"> </text:span><text:span text:style-name="T2">(44/27) </text:span> ⲃⲱⲗⲕ̅ ⲁϥⲟⲩⲱⲛϩ̅ ⲉⲃⲟⲗ ⲁϥⲟⲩ‐ <text:line-break/><text:span text:style-name="T1"> </text:span><text:span text:style-name="T2">(44/28) </text:span> ⲱϣⲉ ⲉⲧⲁⲗⲟ ⲛ̅ϥⲟⲩⲱⲧⲃ̅ ⲉϩⲣⲁⲓ̈ <text:line-break/><text:span text:style-name="T1"> </text:span><text:span text:style-name="T2">(44/29) </text:span> ⲉⲡⲧⲟⲡⲟⲥ ⲉⲧⲙ̅ⲙⲁⲩ· ⲧⲟⲧⲉ <text:line-break/><text:span text:style-name="T1"> </text:span><text:span text:style-name="T2">(44/30) </text:span> ⲁⲡⲕⲁⲓⲣⲟⲥ {ⲉ̅ⲓ} ⲁϥϩⲛⲁⲛ ⲁⲩⲱ <text:line-break/><text:span text:style-name="T1"> </text:span><text:span text:style-name="T2">(44/31) </text:span> ϥϣⲓⲃⲉ ⲛ̅ⲛ̅ⲇⲓⲁⲧⲁⲅⲏ· ⲧⲟⲧⲉ <text:line-break/><text:span text:style-name="T1"> </text:span><text:span text:style-name="T2">(44/32) </text:span> ⲁϥ{ⲉ̅ⲓ} ⲛ̅ϭⲓ ⲡⲟⲩⲟⲉⲓϣ· ϩⲉⲱⲥ <text:line-break/><text:span text:style-name="T1"> </text:span><text:span text:style-name="T2">(44/33) </text:span> ϣⲁⲛⲧⲉⲡϣⲏⲣⲉ ϣⲏⲙ· ⲁⲉⲓ <text:line-break/><text:span text:style-name="T1"> </text:span><text:span text:style-name="T2">(44/34) </text:span> ⲁ{ⲉ̅ⲓ}· ⲛ̅ⲧⲁⲣⲉϥ{ⲉⲓ} ⲉⲧⲉϥⲁⲕⲙⲏ· <text:line-break/><text:span text:style-name="T1"> </text:span><text:span text:style-name="T2">(45/1) </text:span> ⲧⲟⲧⲉ ⲁⲛⲁⲣⲭⲱⲛ ⲧⲛ̅ⲛⲟⲟⲩ <text:line-break/><text:span text:style-name="T1"> </text:span><text:span text:style-name="T2">(45/2) </text:span> ⲙ̅ⲡⲁⲛⲧⲓⲙⲉⲓⲙⲟⲛ ϣⲁ ⲡⲣⲱ‐ <text:line-break/><text:span text:style-name="T1"> </text:span><text:span text:style-name="T2">(45/3) </text:span> ⲙⲉ ⲉⲧⲙ̅ⲙⲁⲩ ⲛ̅ⲥⲉⲥⲟⲩⲱⲛ <text:line-break/><text:span text:style-name="T1"> </text:span><text:span text:style-name="T2">(45/4) </text:span> {ⲛ̅}ⲧⲛ̅ⲛⲟϭ ⲛ̅ϭⲟⲙ· ⲁⲩⲱ ⲛ̅‐ <text:line-break/><text:span text:style-name="T1"> </text:span><text:span text:style-name="T2">(45/5) </text:span> ⲧⲟⲟⲩ ⲛⲉⲩⲥⲟⲛⲧ̅’ ⲉⲃⲟⲗ ϩⲏ‐ <text:line-break/><text:span text:style-name="T1"> </text:span><text:span text:style-name="T2">(45/6) </text:span> ⲧϥ̅ ϫⲉ ϥⲛⲁⲉⲓⲣⲉ ⲛⲁⲩ ⲛ̅ⲟⲩ‐ <text:line-break/><text:span text:style-name="T1"> </text:span><text:span text:style-name="T2">(45/7) </text:span> ⲥⲏⲙⲉⲓⲟⲛ· ⲁⲩⲱ ⲁϥϥⲓ ⲛ̅ϩⲉⲛ‐ <text:line-break/><text:span text:style-name="T1"> </text:span><text:span text:style-name="T2">(45/8) </text:span> ⲛⲟϭ ⲛ̅ⲥⲏⲙⲉⲓⲟⲛ· ⲁⲩⲱ ⲁϥⲣ̅ <text:line-break/><text:span text:style-name="T1"> </text:span><text:span text:style-name="T2">(45/9) </text:span> ⲣ̅ⲣⲟ ⲉϫⲙ̅ ⲡⲕⲁϩ ⲧⲏⲣϥ̅· ⲁⲩⲱ <text:line-break/><text:span text:style-name="T1"> </text:span><text:span text:style-name="T2">(45/10) </text:span> ⲁ〈ϫ〉ⲛ̅ ⲛⲉⲧ’ϩⲁ ⲧⲡⲉ ⲧⲏⲣⲟⲩ· <text:line-break/><text:span text:style-name="T1"> </text:span><text:span text:style-name="T2">(45/11) </text:span> ⲁϥⲕⲁ ⲡⲉϥⲑⲣⲟⲛⲟⲥ {ϩ̅ⲓ}ϫⲛ̅ ⲑⲁ‐ <text:line-break/><text:span text:style-name="T1"> </text:span><text:span text:style-name="T2">(45/12) </text:span> ⲏ ⲛ̅ⲧⲉ ⲡⲕⲁϩ· ϫⲉ ⲛ̅ⲧⲟⲕ ϯⲛⲁ‐ <text:line-break/><text:span text:style-name="T1"> </text:span><text:span text:style-name="T2">(45/13) </text:span> {ⲧ}ⲁⲁⲕ ⲛ̅ⲛⲟⲩⲧⲉ ⲙ̅ⲡⲕⲟⲥⲙⲟⲥ· <text:line-break/><text:span text:style-name="T1"> </text:span><text:span text:style-name="T2">(45/14) </text:span> ϥⲛⲁⲉⲓⲣⲉ ⲛ̅ϩⲉⲛⲥⲏⲙⲉⲓⲟⲛ <text:line-break/><text:span text:style-name="T1"> </text:span><text:span text:style-name="T2">(45/15) </text:span> ⲙⲛ̅ ϩⲉⲛϣⲡⲏⲣⲉ· ⲧⲟⲧⲉ ⲥⲉ‐ <text:line-break/><text:span text:style-name="T1"> </text:span><text:span text:style-name="T2">(45/16) </text:span> ⲛⲁⲡⲱⲛⲉ ⲛ̅ϩⲏⲧ’ ⲛ̅ⲥⲉⲣ̅ⲡⲗⲁ‐ <text:line-break/><text:span text:style-name="T1"> </text:span><text:span text:style-name="T2">(45/17) </text:span> ⲛⲁ· ⲧⲟⲧⲉ ⲛ̅ⲣⲱⲙⲉ ⲉⲧⲙ̅ⲙⲁⲩ <text:line-break/><text:span text:style-name="T1"> </text:span><text:span text:style-name="T2">(45/18) </text:span> ⲉⲧⲛⲁⲟⲩⲁϩⲟⲩ ⲛ̅ⲥⲱϥ ⲥⲉ‐ <text:line-break/><text:span text:style-name="T1"> </text:span><text:span text:style-name="T2">(45/19) </text:span> ⲛⲁⲉⲓⲛⲉ ⲉϩⲟⲩⲛ ⲙ̅ⲡⲥⲃ̅ⲃⲉ· <text:line-break/><text:span text:style-name="T1"> </text:span><text:span text:style-name="T2">(45/20) </text:span> ⲁⲩⲱ ⲛ̅ϥϯ ϩⲁⲡ’ ⲉⲛⲉⲧ’ϩⲛ̅ ⲧ’‐ <text:line-break/><text:span text:style-name="T1"> </text:span><text:span text:style-name="T2">(45/21) </text:span> ⲙⲛ̅ⲧ’ⲁⲧⲥⲃ̅ⲃⲉ ⲉⲧⲉ ⲡⲁⲓ̈ ⲡⲉ <text:line-break/><text:span text:style-name="T1"> </text:span><text:span text:style-name="T2">(45/22) </text:span> ⲡⲗⲁⲟⲥ· ⲕⲁⲓ ⲅⲁⲣ ⲁϥϫⲟⲟⲩ ϩⲁϩ <text:line-break/><text:span text:style-name="T1"> </text:span><text:span text:style-name="T2">(45/23) </text:span> ⲛ̅ⲕⲏⲣⲩⲝ ⲛ̅ϣⲟⲣⲡ̅’ ⲉⲩⲧⲁ‐ <text:line-break/><text:span text:style-name="T1"> </text:span><text:span text:style-name="T2">(45/24) </text:span> ϣⲉ ⲟⲉⲓϣ ϩⲁⲣⲟϥ· ϩⲟⲧⲁⲛ <text:line-break/><text:span text:style-name="T1"> </text:span><text:span text:style-name="T2">(45/25) </text:span> ⲉϥϣⲁⲛϫⲱⲕ ⲉⲃⲟⲗ ⲙ̅ⲡⲭⲣⲟ‐ <text:line-break/><text:span text:style-name="T1"> </text:span><text:span text:style-name="T2">(45/26) </text:span> ⲛⲟⲥ ⲉⲧⲁⲩⲥⲙⲛ̅ⲧϥ̅ ⲛ̅ⲧⲙⲛ̅‐ <text:line-break/><text:span text:style-name="T1"> </text:span><text:span text:style-name="T2">(45/27) </text:span> ⲧⲣ̅ⲣⲟ ⲙ̅ⲡⲕⲁϩ· ⲧⲟⲧⲉ ϥⲛⲏⲩ <text:line-break/><text:soft-page-break/><text:span text:style-name="T1"> </text:span><text:span text:style-name="T2">(45/28) </text:span> ⲛ̅ϭⲓ ⲡⲕⲁⲑⲁⲣⲓⲥⲙⲟⲥ ⲛ̅ⲛ̅ⲯⲩ‐ <text:line-break/><text:span text:style-name="T1"> </text:span><text:span text:style-name="T2">(45/29) </text:span> ⲭⲏ· ⲉⲃⲟⲗ ϫⲉ ⲁⲥⲣ̅ ϩⲟⲩⲉⲣⲱ‐ <text:line-break/><text:span text:style-name="T1"> </text:span><text:span text:style-name="T2">(45/30) </text:span> ⲧⲛ̅ ⲛ̅ϭⲓ ⲧⲕⲁϭⲓⲁ· ⲥⲉⲛⲁⲛⲟⲉⲓⲛ <text:line-break/><text:span text:style-name="T1"> </text:span><text:span text:style-name="T2">(45/31) </text:span> ⲛ̅ϭⲓ ⲛ̅ϭⲁⲙ ⲛ̅ⲑⲁⲗⲁⲥⲥⲁ ⲧⲏⲣⲟⲩ <text:line-break/><text:span text:style-name="T1"> </text:span><text:span text:style-name="T2">(45/32) </text:span> ⲛ̅ⲥⲉϣⲟⲟⲩⲉ· ⲁⲩⲱ ⲡⲉⲥⲧⲉ‐ <text:line-break/><text:span text:style-name="T1"> </text:span><text:span text:style-name="T2">(45/33) </text:span> ⲣⲉⲱⲙⲁ ϥⲁϣⲟⲩⲉ ⲉⲓⲱⲧⲉ <text:line-break/><text:span text:style-name="T1"> </text:span><text:span text:style-name="T2">(45/34) </text:span> ⲁⲛ ⲉϩⲣⲁⲓ̈· ⲙ̅ⲡⲏⲅⲏ ⲥⲉⲛⲁⲱ‐ <text:line-break/><text:span text:style-name="T1"> </text:span><text:span text:style-name="T2">(45/35) </text:span> ϫⲛ̅· ⲛⲓⲉⲣⲱⲟⲩ ⲥⲉⲛⲉϩⲉϯ ⲁⲛ <text:line-break/><text:span text:style-name="T1"> </text:span><text:span text:style-name="T2">(46/1) </text:span> ⲉϩⲣⲁⲓ̈ ⲉⲛⲟⲩⲡⲏ̣ⲅⲏ· ⲁⲩⲱ ⲙ̅‐ <text:line-break/><text:span text:style-name="T1"> </text:span><text:span text:style-name="T2">(46/2) </text:span> ⲙⲟⲩⲉⲓⲟⲟⲩⲉ ⲛ̅ⲛⲙ̅ⲡⲏⲅⲏ ⲛ̅ⲧⲉ <text:line-break/><text:span text:style-name="T1"> </text:span><text:span text:style-name="T2">(46/3) </text:span> ⲡⲕⲁϩ ⲥⲉⲛⲁⲱϫⲛ̅· ⲧⲟⲧⲉ ⲛ̅ⲛⲟⲩⲛ <text:line-break/><text:span text:style-name="T1"> </text:span><text:span text:style-name="T2">(46/4) </text:span> ⲥⲉⲛⲁⲥⲱⲗⲉϫ ⲛ̅ⲥⲉⲟⲩⲱⲛ· ⲛ̅ⲥⲓⲟⲩ <text:line-break/><text:span text:style-name="T1"> </text:span><text:span text:style-name="T2">(46/5) </text:span> ⲥⲉⲛⲁⲁⲉⲓⲁⲉⲓ· ⲁⲩⲱ ⲡⲣⲏ ϥⲛⲁⲱ‐ <text:line-break/><text:span text:style-name="T1"> </text:span><text:span text:style-name="T2">(46/6) </text:span> ϫⲛ̅· ⲁⲩⲱ ϯⲛⲁⲣ̅ⲁⲛⲁⲭⲱⲣⲉⲓ ⲙⲛ̅ <text:line-break/><text:span text:style-name="T1"> </text:span><text:span text:style-name="T2">(46/7) </text:span> ⲟⲩⲟⲛ ⲛⲓⲙ ⲉⲧⲛⲁⲥⲟⲩⲱⲛⲧ̅’· <text:line-break/><text:span text:style-name="T1"> </text:span><text:span text:style-name="T2">(46/8) </text:span> ⲁⲩⲱ ⲥⲉⲛⲁⲃⲱⲕ ⲉϩⲟⲩⲛ ⲉⲡⲟⲩ‐ <text:line-break/><text:span text:style-name="T1"> </text:span><text:span text:style-name="T2">(46/9) </text:span> ⲟⲉⲓⲛ ⲛ̅ⲁⲙⲉⲧⲣⲏⲧⲟⲛ· ⲉⲙⲛ̅ <text:line-break/><text:span text:style-name="T1"> </text:span><text:span text:style-name="T2">(46/10) </text:span> ⲗⲁⲁⲩ ⲛ̅ⲧⲉ ⲧⲥⲁⲣⲁⲝ ⲁⲙⲁϩⲧⲉ <text:line-break/><text:span text:style-name="T1"> </text:span><text:span text:style-name="T2">(46/11) </text:span> ⲙ̅ⲙⲟⲟⲩ· ⲟⲩⲧⲉ ⲧⲣⲩⲫⲏ ⲛ̅ⲧⲉ <text:line-break/><text:span text:style-name="T1"> </text:span><text:span text:style-name="T2">(46/12) </text:span> ⲡⲕⲱϩⲧ̅’ ⲥⲉⲛⲁϣⲱⲡⲉ ⲉⲩⲉⲥⲓ‐ <text:line-break/><text:span text:style-name="T1"> </text:span><text:span text:style-name="T2">(46/13) </text:span> ⲱⲟⲩ ⲉⲩⲟⲩⲁⲁⲃ· ⲉⲙⲛ̅ ⲗⲁⲁⲩ <text:line-break/><text:span text:style-name="T1"> </text:span><text:span text:style-name="T2">(46/14) </text:span> ⲥⲱⲕ ⲙ̅ⲙⲟⲟⲩ ⲉⲡⲓⲧⲛ̅· ⲉⲉⲓⲣ̅‐ <text:line-break/><text:span text:style-name="T1"> </text:span><text:span text:style-name="T2">(46/15) </text:span> ⲥⲕⲉⲡⲁⲍⲉ ⲙ̅ⲙⲟⲟⲩ {ϩ̅ⲓ}ⲧⲟⲟⲧ’· <text:line-break/><text:span text:style-name="T1"> </text:span><text:span text:style-name="T2">(46/16) </text:span> ⲉⲩⲛ̅ⲧⲁⲩ ⲙ̅ⲙⲁⲩ ⲛ̅ⲛ̅ⲉⲛⲇⲩ‐ <text:line-break/><text:span text:style-name="T1"> </text:span><text:span text:style-name="T2">(46/17) </text:span> ⲙⲁ ⲉⲧⲟⲩⲁⲁⲃ· ⲛⲁⲓ̈ ⲉⲧⲉ ⲙ̅ⲙⲛ̅ <text:line-break/><text:span text:style-name="T1"> </text:span><text:span text:style-name="T2">(46/18) </text:span> ϣϭⲟⲙ ⲛ̅ⲧⲉ ⲡⲕⲱϩⲧ̅’ ϫⲱϩ ⲉⲣⲟ‐ <text:line-break/><text:span text:style-name="T1"> </text:span><text:span text:style-name="T2">(46/19) </text:span> ⲟⲩ· ⲉⲓⲧⲁ ⲟⲩⲕⲁⲕⲉ ⲙⲛ̅ ⲟⲩ‐ <text:line-break/><text:span text:style-name="T1"> </text:span><text:span text:style-name="T2">(46/20) </text:span> ⲧⲏⲟⲩ ⲙⲛ̅ ⲟⲩⲥⲧⲓⲅⲙⲏ· ϩⲱⲥ‐ <text:line-break/><text:span text:style-name="T1"> </text:span><text:span text:style-name="T2">(46/21) </text:span> ⲧⲉ ⲁⲧⲉϥⲧⲱⲙ ⲛ̅ⲛ̅ⲃⲉⲗ· ⲧⲟⲧⲉ <text:line-break/><text:span text:style-name="T1"> </text:span><text:span text:style-name="T2">(46/22) </text:span> ϥⲛⲏⲟⲩ ⲉϥⲟⲧⲟⲩ ⲧⲏⲣⲟⲩ ⲉⲃⲟⲗ· <text:line-break/><text:span text:style-name="T1"> </text:span><text:span text:style-name="T2">(46/23) </text:span> ⲁⲩⲱ ⲥⲉⲛⲁϣⲱⲡⲉ ⲉⲩⲣ̅ⲕⲟⲗⲁ‐ <text:line-break/><text:span text:style-name="T1"> </text:span><text:span text:style-name="T2">(46/24) </text:span> ⲍⲉ ⲙ̅ⲙⲟⲟⲩ ϣⲁⲛⲧⲟⲩⲧⲃ̅ⲃⲟ· <text:line-break/><text:span text:style-name="T1"> </text:span><text:span text:style-name="T2">(46/25) </text:span> ⲧⲟⲧⲉ ⲡⲟⲩⲭⲣⲟⲛⲟⲥ ⲉⲧⲁⲩⲧⲁ‐ <text:line-break/><text:span text:style-name="T1"> </text:span><text:span text:style-name="T2">(46/26) </text:span> ⲁϥ ⲛⲁⲩ ⲁⲧⲣⲉⲩⲉⲙⲁϩⲧⲉ ⲉ‐ <text:line-break/><text:span text:style-name="T1"> </text:span><text:span text:style-name="T2">(46/27) </text:span> ⲧⲁⲩⲟⲡϥ̅ ⲉⲣⲟⲟⲩ· ⲙ̅ⲙⲛ̅ⲧⲁϥ <text:line-break/><text:span text:style-name="T1"> </text:span><text:span text:style-name="T2">(46/28) </text:span> ⲧⲉ ⲛ̅ϣⲉ ⲛ̅ⲣⲟⲙⲡⲉ ⲥⲉ ⲙⲛ̅ ϣⲙⲟⲩ‐ <text:line-break/><text:span text:style-name="T1"> </text:span><text:span text:style-name="T2">(46/29) </text:span> ⲛⲉ· ϩⲟⲧⲁⲛ ⲉⲣϣⲁⲛⲡⲕⲱϩⲧ̅’ <text:line-break/><text:span text:style-name="T1"> </text:span><text:span text:style-name="T2">(46/30) </text:span> ⲣⲁⲕϩⲟⲩ ⲧⲏⲣⲟⲩ· ⲁⲩⲱ ⲉ‐ <text:line-break/><text:span text:style-name="T1"> </text:span><text:span text:style-name="T2">(46/31) </text:span> ϣⲁϥⲧⲛ̅ⲧⲙ̅ϭⲛ̅ ⲗⲁⲁⲩ ⲉⲣⲱⲕϩ̅· <text:line-break/><text:span text:style-name="T1"> </text:span><text:span text:style-name="T2">(46/32) </text:span> ⲧⲟⲧⲉ ϥⲛⲁⲱϫⲛ̅ ⲉⲃⲟⲗ {ϩ̅ⲓ}ⲧⲟⲟⲧϥ̅ <text:line-break/><text:span text:style-name="T1"> </text:span><text:span text:style-name="T2">(46/33) </text:span> ⲟⲩⲁⲁϥ· ⲧⲟⲧⲉ ϥⲛⲁϫⲱⲕ ⲉⲃⲟⲗ <text:line-break/><text:span text:style-name="T1"> </text:span><text:span text:style-name="T2">(47/1) </text:span> ⲛ̅ϭⲓ ⲡ[.]ϩ[ <text:line-break/><text:span text:style-name="T1"> </text:span><text:span text:style-name="T2">(47/2) </text:span> ⲧⲉ ⲧⲙⲁϩ ϭⲁⲙ [ⲥⲛ̅ⲧⲉ <text:line-break/><text:span text:style-name="T1"> </text:span><text:span text:style-name="T2">(47/3) </text:span> ⲧⲉ ⲡⲛⲁ ⲛ̅ⲛⲏⲟⲩ[....ⲉⲃⲟⲗ] <text:line-break/><text:span text:style-name="T1"> </text:span><text:span text:style-name="T2">(47/4) </text:span> {ϩ̅ⲓ}ⲧⲛ̅ ⲧⲥⲟⲫⲓⲁ ⲉⲓ[ <text:line-break/><text:span text:style-name="T1"> </text:span><text:span text:style-name="T2">(47/5) </text:span> ⲧⲟⲧⲉ ⲛ̅ⲥⲧⲉⲣⲉⲱⲙⲁ [ⲛⲁϩⲉ] <text:line-break/><text:span text:style-name="T1"> </text:span><text:span text:style-name="T2">(47/6) </text:span> ⲉⲡⲓⲧⲛ̅ ⲉⲡⲛⲟⲩⲛ· ⲧⲟⲧⲉ [ⲛ̅]‐ <text:line-break/><text:soft-page-break/><text:span text:style-name="T1"> </text:span><text:span text:style-name="T2">(47/7) </text:span> ϣⲏⲣⲉ ⲛ̅ⲑⲩⲗⲏ ⲛⲁⲱϫⲛ̅· ⲛ̅ⲥⲉ‐ <text:line-break/><text:span text:style-name="T1"> </text:span><text:span text:style-name="T2">(47/8) </text:span> ⲛⲁϣⲱⲡⲉ ⲁⲛ ϫⲓⲛ ⲙ̅ⲡⲉⲓ̈ⲛⲁⲩ· <text:line-break/><text:span text:style-name="T1"> </text:span><text:span text:style-name="T2">(47/9) </text:span> ⲧⲟⲧⲉ ⲙ̅ⲯⲩⲭⲏ ⲛⲁⲟⲩⲱⲛϩ̅ <text:line-break/><text:span text:style-name="T1"> </text:span><text:span text:style-name="T2">(47/10) </text:span> ⲉⲃⲟⲗ ⲉⲩⲟⲩⲁⲁⲃⲉ {ϩ̅ⲓ}ⲧⲙ̅ ⲡⲟ̣[ⲩ]‐ <text:line-break/><text:span text:style-name="T1"> </text:span><text:span text:style-name="T2">(47/11) </text:span> ⲟⲉⲓⲛ ⲛ̅ⲧϭⲟⲙ· ⲧⲁⲓ̈ ⲉⲧ’ϫⲟⲥⲉ̣ <text:line-break/><text:span text:style-name="T1"> </text:span><text:span text:style-name="T2">(47/12) </text:span> ⲉⲛϭⲟⲙ ⲧⲏⲣⲟⲩ· ϯⲁⲧ’ϣⲓ[ⲧⲥ̅] <text:line-break/><text:span text:style-name="T1"> </text:span><text:span text:style-name="T2">(47/13) </text:span> ϯⲕⲁⲑⲟⲗⲓⲕⲏ· ⲁⲛⲟⲕ ⲙⲛ̅ <text:line-break/><text:span text:style-name="T1"> </text:span><text:span text:style-name="T2">(47/14) </text:span> ⲛⲉⲧ’ⲛⲁⲥⲟⲩⲱⲛⲧ̅’ ⲧⲏⲣⲟⲩ· <text:line-break/><text:span text:style-name="T1"> </text:span><text:span text:style-name="T2">(47/15) </text:span> ⲁⲩⲱ ⲥⲉⲛⲁϣⲱⲡⲉ ϩⲙ̅ ⲡⲁⲓ‐ <text:line-break/><text:span text:style-name="T1"> </text:span><text:span text:style-name="T2">(47/16) </text:span> ⲱⲛ ⲛ̅ⲧⲙⲛ̅ⲧ’ⲥⲁⲉⲓⲉ· ⲛ̅ⲧⲉ <text:line-break/><text:span text:style-name="T1"> </text:span><text:span text:style-name="T2">(47/17) </text:span> ⲡⲁⲓⲱⲛ ⲙ̅ⲫⲁⲡ’ ⲉⲩⲥⲃ̅ⲧⲁⲧ’ <text:line-break/><text:span text:style-name="T1"> </text:span><text:span text:style-name="T2">(47/18) </text:span> ϩⲛ̅ ⲧⲥⲟⲫⲓⲁ· ⲉⲁⲩϯ ⲉⲟⲟⲩ <text:line-break/><text:span text:style-name="T1"> </text:span><text:span text:style-name="T2">(47/19) </text:span> ⲙ̅ⲡⲉⲧ’ϩⲛ̅ ⲧⲙⲛ̅ⲧ’ⲟⲩⲁ ⲛ̅ⲟⲩ‐ <text:line-break/><text:span text:style-name="T1"> </text:span><text:span text:style-name="T2">(47/20) </text:span> ⲱⲧ’ ⲛ̅ⲁⲧ’ⲧⲉϩⲟϥ· ⲁⲩⲱ ⲉⲩ‐ <text:line-break/><text:span text:style-name="T1"> </text:span><text:span text:style-name="T2">(47/21) </text:span> ⲛⲁⲩ ⲉⲣⲟϥ ⲉⲧⲃⲉ ⲡⲉϥⲟⲩⲱ‐ <text:line-break/><text:span text:style-name="T1"> </text:span><text:span text:style-name="T2">(47/22) </text:span> ϣⲉ ⲉⲧⲛ̅ϩⲏⲧⲟⲩ· ⲁⲩⲱ <text:line-break/><text:span text:style-name="T1"> </text:span><text:span text:style-name="T2">(47/23) </text:span> ⲁⲩϣⲱⲡⲉ ⲧⲏⲣⲟⲩ ⲛ̅{ϩ̅ⲓ}‐ <text:line-break/><text:span text:style-name="T1"> </text:span><text:span text:style-name="T2">(47/24) </text:span> ⲕⲱⲛ ϩⲙ̅ ⲡⲉϥⲟⲩⲟⲉⲓⲛ· ⲁⲩ‐ <text:line-break/><text:span text:style-name="T1"> </text:span><text:span text:style-name="T2">(47/25) </text:span> ⲣ̅ ⲟⲩⲟⲉⲓⲛ ⲧⲏⲣⲟⲩ· ⲁⲩⲙ̅ⲧⲟⲛ <text:line-break/><text:span text:style-name="T1"> </text:span><text:span text:style-name="T2">(47/26) </text:span> ⲙ̅ⲙⲟⲟⲩ ϩⲛ̅ ⲧⲉϥⲁⲛⲁⲡⲁⲩⲥⲓⲥ· <text:line-break/><text:span text:style-name="T1"> </text:span><text:span text:style-name="T2">(47/27) </text:span> ⲁⲩⲱ ⲙ̅ⲯⲩⲭⲏ ⲉⲧⲟⲩⲣ̅ⲕⲟ‐ <text:line-break/><text:span text:style-name="T1"> </text:span><text:span text:style-name="T2">(47/28) </text:span> ⲗⲁⲍⲉ ⲙ̅ⲙⲟⲟⲩ ϥⲛⲁⲃⲟⲗⲟⲩ <text:line-break/><text:span text:style-name="T1"> </text:span><text:span text:style-name="T2">(47/29) </text:span> ⲉⲃⲟⲗ· ⲁⲩⲱ ⲛ̅ⲥⲉϣⲱⲡⲉ <text:line-break/><text:span text:style-name="T1"> </text:span><text:span text:style-name="T2">(47/30) </text:span> ϩⲙ̅ ⲡⲧⲟⲩⲃⲟ· ⲁⲩⲱ ⲥⲉⲛⲁ‐ <text:line-break/><text:span text:style-name="T1"> </text:span><text:span text:style-name="T2">(47/31) </text:span> ⲛⲁⲩ ⲉⲛⲉⲧ’ⲟⲩⲁⲁⲃ· ⲥⲉⲛⲁ‐ <text:line-break/><text:span text:style-name="T1"> </text:span><text:span text:style-name="T2">(47/32) </text:span> ϫⲓ ϣⲕⲁⲕ ⲉⲃⲟⲗ ⲉⲣⲟⲟⲩ ϫⲉ <text:line-break/><text:span text:style-name="T1"> </text:span><text:span text:style-name="T2">(47/33) </text:span> ⲛⲁ ⲛⲁⲛ ⲧϭⲟⲙ· ⲧⲁⲓ̈ ⲉⲧⲛ̅ⲧⲡⲉ <text:line-break/><text:span text:style-name="T1"> </text:span><text:span text:style-name="T2">(47/34) </text:span> ⲛ̅ⲛ̅ϭⲟⲙ ⲧⲏⲣⲟⲩ· ϩⲟⲧⲓ ϫⲉ <text:line-break/><text:span text:style-name="T1"> </text:span><text:span text:style-name="T2">(48/1) </text:span> [ 10+- ] ⲁⲩⲱ ϩⲙ̅ ⲡϣⲏ̅ <text:line-break/><text:span text:style-name="T1"> </text:span><text:span text:style-name="T2">(48/2) </text:span> [ⲛ̅ⲙⲛ̅ⲧϫⲓ ⲛ]ϭ̣ⲟⲛⲥ̅ ⲉⲧ’ϣⲟⲟⲡ’ ⲉ <text:line-break/><text:span text:style-name="T1"> </text:span><text:span text:style-name="T2">(48/3) </text:span> [ 6+-] ⲉⲣⲟϥ ⲛ̅ⲛⲟⲩⲃⲁⲗ· <text:line-break/><text:span text:style-name="T1"> </text:span><text:span text:style-name="T2">(48/4) </text:span> [ⲁⲩⲱ ⲥⲉ]ⲕⲱⲧⲉ ⲛ̅ⲥⲱϥ ⲁⲛ· <text:line-break/><text:span text:style-name="T1"> </text:span><text:span text:style-name="T2">(48/5) </text:span> [ⲉⲃⲟ]ⲗ̣ ϫⲉ ⲥⲉⲕⲱⲧⲉ ⲛ̅ⲥⲱⲛ ⲁⲛ· <text:line-break/><text:span text:style-name="T1"> </text:span><text:span text:style-name="T2">(48/6) </text:span> ⲟ̣[ⲩ]ⲇⲉ ⲛ̅ⲥⲉⲡⲓⲥⲧⲉⲩⲉ ⲉⲣⲟⲛ ⲁⲛ· <text:line-break/><text:span text:style-name="T1"> </text:span><text:span text:style-name="T2">(48/7) </text:span> ⲁⲗⲗⲁ ⲁⲩⲉⲓⲣⲉ ⲁⲧ’ⲕⲧⲓⲥⲓⲥ ⲛ̅‐ <text:line-break/><text:span text:style-name="T1"> </text:span><text:span text:style-name="T2">(48/8) </text:span> ⲛ̅ⲁⲣⲭⲱⲛ ⲙⲛ̅ ⲛⲉⲥⲕⲉⲁⲣⲭⲱⲛ· <text:line-break/><text:span text:style-name="T1"> </text:span><text:span text:style-name="T2">(48/9) </text:span> ⲁⲩⲱ ⲁⲛⲣ̅ⲡⲣⲁⲥⲥⲁ ⲕⲁⲧⲁ ⲧⲛ̅‐ <text:line-break/><text:span text:style-name="T1"> </text:span><text:span text:style-name="T2">(48/10) </text:span> ⲅⲉⲛⲉⲥⲓⲥ ⲛ̅ⲧⲉ ⲧⲥⲁⲣⲁⲝ ⲛ̅ⲧⲕⲧⲓ‐ <text:line-break/><text:span text:style-name="T1"> </text:span><text:span text:style-name="T2">(48/11) </text:span> ⲥⲓⲥ ⲛ̅ⲛ̅ⲁⲣⲭⲱⲛ ⲉⲥϯ ⲛⲟⲙⲟⲥ· <text:line-break/><text:span text:style-name="T1"> </text:span><text:span text:style-name="T2">(48/12) </text:span> ⲁⲛⲟⲛ ϩⲱⲱⲛ ⲉⲁⲛϣⲱⲡⲉ <text:line-break/><text:span text:style-name="T1"> </text:span><text:span text:style-name="T2">(48/13) </text:span> ϩⲙ̅ ⲡⲁⲓⲱⲛ ⲛ̅ⲁⲧⲣ〈ⲉ〉ⲡⲧⲟⲥ· <text:line-break/><text:span text:style-name="T1"> </text:span><text:span text:style-name="T2">(48/14) </text:span> ⲡⲛⲟⲏⲙⲁ ⲛ̅ⲧⲛ̅ⲛⲟϭ <text:line-break/><text:span text:style-name="T1"> </text:span><text:span text:style-name="T2">(48/15) </text:span> ⲛ̅ϭⲟⲙ· </text:p>
      <text:p text:style-name="P1"/>
      <text:p text:style-name="P3">( codex VI ) Plato, Republic 588A-589B</text:p>
      <text:p text:style-name="P2"><text:span text:style-name="T1"> </text:span><text:span text:style-name="T2">(48/1) </text:span> ʹ26ⲉⲡⲓⲇⲏ ⲁⲛⲟⲛ ⲁⲛϣⲱⲡⲉ ⲛ̅ⲟⲩ‐ <text:line-break/><text:span text:style-name="T1"> </text:span><text:span text:style-name="T2">(48/2) </text:span> ⲗⲟⲅⲟⲥ ⲙ̅ⲡⲓⲙⲁ· ⲙⲁⲣⲛ̅ϫⲓ ϭⲉ <text:line-break/><text:span text:style-name="T1"> </text:span><text:span text:style-name="T2">(48/3) </text:span> ⲛⲁⲛ ⲛ̅ⲛ̅ϣⲟⲣⲡ̅’ ⲉⲛⲧⲁⲩϫⲟⲟⲩ <text:line-break/><text:span text:style-name="T1"> </text:span><text:span text:style-name="T2">(48/4) </text:span> ⲛⲁⲛ· ⲁⲩⲱ ⲧⲛ̅ⲛⲁϭⲓⲛⲉ ⲙ̅ⲙⲟⲥ <text:line-break/><text:span text:style-name="T1"> </text:span><text:span text:style-name="T2">(48/5) </text:span> ⲉϥϫⲱ ⲙ̅ⲙⲟⲥ· ϫⲉ ⲛⲁⲛⲟⲩ <text:line-break/><text:span text:style-name="T1"> </text:span><text:span text:style-name="T2">(48/6) </text:span> ⲡⲉⲛⲧⲁⲩϫⲓⲧϥ̅ ⲛ̅ϭⲟⲛⲥ̅ ⲧⲉⲗⲉ‐ <text:line-break/><text:span text:style-name="T1"> </text:span><text:span text:style-name="T2">(48/7) </text:span> ⲱⲥ· ϣⲁϥϫⲓ ⲉⲟⲟⲩ ⲇⲓⲕⲁⲓⲱⲥ· <text:line-break/><text:span text:style-name="T1"> </text:span><text:span text:style-name="T2">(48/8) </text:span> ⲙⲏ ⲛ̅ⲧⲁⲓ̈ ⲁⲛ ⲧⲉ ⲑⲉ ⲉⲛⲧⲁⲩ‐ <text:line-break/><text:span text:style-name="T1"> </text:span><text:span text:style-name="T2">(48/9) </text:span> ϫⲡⲓⲟϥ· ⲧⲉⲓ̈ ⲙⲉⲛⲧⲟⲓⲅⲉ ⲧⲉ ⲑⲉ <text:line-break/><text:span text:style-name="T1"> </text:span><text:span text:style-name="T2">(48/10) </text:span> ⲉⲧⲉϣϣⲉ· ⲡⲉϫⲁⲓ̈ ⲇⲉ ϫⲉ ⲧⲉ‐ <text:line-break/><text:span text:style-name="T1"> </text:span><text:span text:style-name="T2">(48/11) </text:span> ⲛⲟⲩ ϭⲉ· ⲁⲛϣⲁϫⲉ· ⲉⲡⲓⲇⲏ <text:line-break/><text:span text:style-name="T1"> </text:span><text:span text:style-name="T2">(48/12) </text:span> ⲁϥϫⲟⲟⲥ ϫⲉ ⲡⲉϯⲣⲉ ⲙ̅ⲡϫⲓ ⲛ‐ <text:line-break/><text:span text:style-name="T1"> </text:span><text:span text:style-name="T2">(48/13) </text:span> ϭⲟⲛⲥ̅· ⲙⲛ̅ ⲡⲉϯⲣⲉ ⲙ̅ⲡⲇⲓⲕⲁⲓ‐ <text:line-break/><text:span text:style-name="T1"> </text:span><text:span text:style-name="T2">(48/14) </text:span> ⲟⲛ· ⲡⲟⲩⲁ ⲡⲟⲩⲁ ⲟⲩⲛ̅ⲧⲁϥ <text:line-break/><text:span text:style-name="T1"> </text:span><text:span text:style-name="T2">(48/15) </text:span> ⲟⲩϭⲟⲙ· ⲛ̅ⲁϣ ϭⲉ ⲛ̅ϩⲉ ⲡⲉ‐ <text:line-break/><text:span text:style-name="T1"> </text:span><text:span text:style-name="T2">(48/16) </text:span> ϫⲁϥ ϫⲉ ⲟⲩ{ϩ̅ⲓ}ⲕⲱⲛ ⲉⲙⲛ̅ⲧⲁϥ <text:line-break/><text:span text:style-name="T1"> </text:span><text:span text:style-name="T2">(48/17) </text:span> ⲉⲓⲛⲉ ⲡⲉ ⲡⲗⲟⲅⲟⲥ ⲛ̅ⲧⲯⲩⲭⲏ· <text:line-break/><text:span text:style-name="T1"> </text:span><text:span text:style-name="T2">(48/18) </text:span> ϫⲉⲕⲁⲁⲥ ⲉϥⲛⲁⲙ̅ⲙⲉ ⲛ̅ϭⲓ ⲡⲉⲛ‐ <text:line-break/><text:span text:style-name="T1"> </text:span><text:span text:style-name="T2">(49/1) </text:span> ⲧ̣[ⲁ]ϥ̣ϫⲉ ⲛⲁⲓ̣̈ ⲁ̣ϥ̣[ <text:line-break/><text:span text:style-name="T1"> </text:span><text:span text:style-name="T2">(49/2) </text:span> [....]ⲁ̣ⲣ ⲡⲉ ⲡϯ̅[ <text:line-break/><text:span text:style-name="T1"> </text:span><text:span text:style-name="T2">(49/3) </text:span> ⲛⲉ ⲏ%0 ⲙ̅ⲙⲟⲛ ⲁⲛ[ <text:line-break/><text:span text:style-name="T1"> </text:span><text:span text:style-name="T2">(49/4) </text:span> ϣⲟⲟⲡ’ ⲛⲁⲓ̈· ⲁⲗⲗⲁ ⲙ̣̅[ <text:line-break/><text:span text:style-name="T1"> </text:span><text:span text:style-name="T2">(49/5) </text:span> ⲧⲏⲣⲟⲩ ⲉⲛⲧⲁⲩϫⲟⲟⲩ [ <text:line-break/><text:span text:style-name="T1"> </text:span><text:span text:style-name="T2">(49/6) </text:span> ⲁⲣⲭⲱⲛ· ⲛⲁⲓ̈ ϯⲛⲟⲩ ⲛⲉⲛ‐ <text:line-break/><text:span text:style-name="T1"> </text:span><text:span text:style-name="T2">(49/7) </text:span> ⲧⲁⲩϣⲱⲡⲉ ⲙ̅ⲫⲩⲥⲓⲥ· ⲁⲩⲱ <text:line-break/><text:span text:style-name="T1"> </text:span><text:span text:style-name="T2">(49/8) </text:span> ⲡⲭⲓⲙⲁⲣⲣⲁⲓⲥ ⲙⲛ̅ ⲡⲕⲉⲣⲃⲟⲩ <text:line-break/><text:span text:style-name="T1"> </text:span><text:span text:style-name="T2">(49/9) </text:span> ⲙⲛ̅ ⲡⲕⲉⲥⲉⲉⲡⲉ ⲧⲏⲣϥ̅ ⲉⲛ‐ <text:line-break/><text:span text:style-name="T1"> </text:span><text:span text:style-name="T2">(49/10) </text:span> ⲧⲁⲩϣⲁϫⲉ ⲉⲣⲟⲟⲩ· ⲁⲩⲣ̅ⲕ̣ⲁ̣‐ <text:line-break/><text:span text:style-name="T1"> </text:span><text:span text:style-name="T2">(49/11) </text:span> ⲧⲁⲛⲧⲁ ⲧⲏⲣⲟⲩ ⲁⲩϯ ⲟⲩⲱ͂ <text:line-break/><text:span text:style-name="T1"> </text:span><text:span text:style-name="T2">(49/12) </text:span> ⲉⲃⲟⲗ ⲛ̅ϩⲉⲛⲙⲟⲣⲫⲏ ⲙⲛ̅ ϩⲉⲛ̣‐ <text:line-break/><text:span text:style-name="T1"> </text:span><text:span text:style-name="T2">(49/13) </text:span> ⲉⲓⲛⲉ· ⲁⲩⲱ ⲁⲩϣⲱⲡⲉ ⲧⲏ‐ <text:line-break/><text:span text:style-name="T1"> </text:span><text:span text:style-name="T2">(49/14) </text:span> ⲣⲟⲩ ⲛ̅ⲟⲩⲉⲓⲛⲉ ⲟⲩⲱⲧ’· ⲉⲩ‐ <text:line-break/><text:span text:style-name="T1"> </text:span><text:span text:style-name="T2">(49/15) </text:span> ϫⲱ ⲙ̅ⲙⲟⲥ ϫⲉ ⲁⲣⲓ ϩⲱⲃ ⲧⲉ‐ <text:line-break/><text:span text:style-name="T1"> </text:span><text:span text:style-name="T2">(49/16) </text:span> ⲛⲟⲩ· ⲟⲩⲉⲓⲛⲉ ⲙⲉⲛⲧⲟⲓⲅⲉ <text:line-break/><text:span text:style-name="T1"> </text:span><text:span text:style-name="T2">(49/17) </text:span> ⲛ̅ⲟⲩⲱⲧ’ ⲡⲉ· ⲡⲁⲓ̈ ⲛ̅ⲧⲁϥϣⲱ‐ <text:line-break/><text:span text:style-name="T1"> </text:span><text:span text:style-name="T2">(49/18) </text:span> ⲡⲉ ⲙ̅ⲡⲓⲛⲉ ⲛ̅ⲟⲩⲑⲏⲣⲓⲟⲛ ⲉϥ‐ <text:line-break/><text:span text:style-name="T1"> </text:span><text:span text:style-name="T2">(49/19) </text:span> ϣⲃ̅ⲃⲓⲟⲉⲓⲧ’ ϩⲛ̅ ⲟⲩⲛⲟϭ ⲛ̅ⲁⲡⲉ· <text:line-break/><text:span text:style-name="T1"> </text:span><text:span text:style-name="T2">(49/20) </text:span> ϩⲉⲛϩⲟⲟⲩ ⲙⲉⲛ ⲉϥⲟ ⲛ̅ⲑⲉ ⲙ̅‐ <text:line-break/><text:span text:style-name="T1"> </text:span><text:span text:style-name="T2">(49/21) </text:span> ⲡⲓⲛⲉ ⲛ̅ⲟⲩⲑⲏⲣⲓⲟⲛ ⲛ̅ⲁⲅⲣⲓⲟⲛ· <text:line-break/><text:span text:style-name="T1"> </text:span><text:span text:style-name="T2">(49/22) </text:span> ⲧⲟⲧⲉ ϣⲁϥϭⲙ̅ϭⲟⲙ ⲛ̅ⲛⲟⲩϫⲉ <text:line-break/><text:span text:style-name="T1"> </text:span><text:span text:style-name="T2">(49/23) </text:span> ⲉⲃⲟⲗ ⲙ̅ⲡⲓⲛⲉ ⲛ̅ϣⲟⲣⲡ̅’· ⲛ̅ⲧⲉ <text:line-break/><text:span text:style-name="T1"> </text:span><text:span text:style-name="T2">(49/24) </text:span> ⲛⲁⲓ̈ ⲧⲏⲣⲟⲩ ⲛⲓⲡⲗⲁⲥⲙⲁ ⲉⲧ’‐ <text:line-break/><text:span text:style-name="T1"> </text:span><text:span text:style-name="T2">(49/25) </text:span> ⲛⲁϣⲧ̅’· ⲁⲩⲱ ⲉⲧ’ⲙⲟⲕϩ̅ ⲛ̅ⲥⲉ‐ <text:line-break/><text:span text:style-name="T1"> </text:span><text:span text:style-name="T2">(49/26) </text:span> ϯ ⲟⲩⲱ ⲉⲃⲟⲗ ⲛ̅ϩⲏⲧϥ̅ ϩⲛ̅ ⲟⲩ‐ <text:line-break/><text:span text:style-name="T1"> </text:span><text:span text:style-name="T2">(49/27) </text:span> ⲉⲣⲅⲟⲛ· ⲉⲡⲓⲇⲏ ⲛⲉⲧⲟⲩⲣ̅‐ <text:line-break/><text:span text:style-name="T1"> </text:span><text:span text:style-name="T2">(49/28) </text:span> ⲡⲗⲁⲥⲥⲉ ⲙ̅ⲙⲟⲟⲩ ϯⲛⲟⲩ <text:line-break/><text:span text:style-name="T1"> </text:span><text:span text:style-name="T2">(49/29) </text:span> ϩⲛ̅ ⲟⲩⲗⲁ’ϩ←ⲗⲉϩ· ⲁⲩⲱ ⲙⲛ̅ <text:line-break/><text:soft-page-break/><text:span text:style-name="T1"> </text:span><text:span text:style-name="T2">(49/30) </text:span> ⲡⲕⲉⲥⲉⲉⲡⲉ ⲧⲏⲣϥ̅ ⲉⲧ’ⲧⲛ̅‐ <text:line-break/><text:span text:style-name="T1"> </text:span><text:span text:style-name="T2">(49/31) </text:span> ⲧⲱⲛ ⲉⲣⲟⲟⲩ ⲉⲩⲣ̅ⲡⲗⲁⲥⲥⲉ <text:line-break/><text:span text:style-name="T1"> </text:span><text:span text:style-name="T2">(49/32) </text:span> ϯⲛⲟⲩ ϩⲙ̅ ⲡϣⲁϫⲉ· ⲧⲉⲛⲟⲩ <text:line-break/><text:span text:style-name="T1"> </text:span><text:span text:style-name="T2">(49/33) </text:span> ⲅⲁⲣ ⲟⲩⲉⲓⲛⲉ ⲟⲩⲱⲧ’ ⲡⲉ· ⲟⲩ‐ <text:line-break/><text:span text:style-name="T1"> </text:span><text:span text:style-name="T2">(49/34) </text:span> ⲉⲧ’ ⲡⲓⲛⲉ ⲅⲁⲣ ⲙ̅ⲡⲙⲟⲩⲉⲓ <text:line-break/><text:span text:style-name="T1"> </text:span><text:span text:style-name="T2">(49/35) </text:span> ⲁⲩⲱ ⲟⲩⲉⲧ’ ⲡⲓⲛⲉ ⲙ̅ⲡⲣⲱⲙⲉ <text:line-break/><text:span text:style-name="T1"> </text:span><text:span text:style-name="T2">(50/1) </text:span> [ 6+-ⲟ]ⲩ̣ⲱⲧ’ ⲡⲉ ⲡ̣[...] ⲙ̅ <text:line-break/><text:span text:style-name="T1"> </text:span><text:span text:style-name="T2">(50/2) </text:span> [ 6+-]ⲧ̣ⲱϭⲉ· ⲁ[ⲩ]ⲱ̣ ⲡ̣ⲁⲓ̈ <text:line-break/><text:span text:style-name="T1"> </text:span><text:span text:style-name="T2">(50/3) </text:span> [.... ϣ]ⲃ̅ⲃⲓⲁⲉⲓⲧ’ ⲙ̅ⲡϣⲁ ⲛ̅ϩⲟⲩⲟ <text:line-break/><text:span text:style-name="T1"> </text:span><text:span text:style-name="T2">(50/4) </text:span> [ⲉⲡϣⲟ]ⲣ̣ⲡ̅’̣· ⲁⲩⲱ ⲡⲙⲁϩⲥⲛⲁⲩ <text:line-break/><text:span text:style-name="T1"> </text:span><text:span text:style-name="T2">(50/5) </text:span> [ⲡⲉ ⲟⲩ]ϣⲙ̅· ⲁⲩⲣ̅ⲡⲗⲁⲥⲥⲉ ⲙ̅ⲙⲟϥ· <text:line-break/><text:span text:style-name="T1"> </text:span><text:span text:style-name="T2">(50/6) </text:span> [ⲧ]ⲉⲛⲟⲩ ϭⲉ ⲧⲱϭⲉ ⲙ̅ⲙⲟⲟⲩ ⲉⲛⲉⲩ‐ <text:line-break/><text:span text:style-name="T1"> </text:span><text:span text:style-name="T2">(50/7) </text:span> ⲉⲣⲏⲟⲩ ⲛ̅ⲧⲉⲧⲛ̅ⲁⲁⲩ ⲛ̅ⲟⲩⲁ ⲛ̅‐ <text:line-break/><text:span text:style-name="T1"> </text:span><text:span text:style-name="T2">(50/8) </text:span> ⲟⲩⲱⲧ’· ϣⲟⲙⲉⲧ’ ⲅⲁⲣ ⲛⲉ· ϩⲱⲥ‐ <text:line-break/><text:span text:style-name="T1"> </text:span><text:span text:style-name="T2">(50/9) </text:span> ⲧⲉ ⲛ̅ⲥⲉϯ ⲟⲩⲱ ⲙⲛ̅ ⲛⲉⲩⲉⲣⲏⲩ <text:line-break/><text:span text:style-name="T1"> </text:span><text:span text:style-name="T2">(50/10) </text:span> ⲛ̣̅ⲥⲉϣⲱⲡⲉ ⲧⲏⲣⲟⲩ ϩⲛ̅ ⲟⲩⲉⲓ‐ <text:line-break/><text:span text:style-name="T1"> </text:span><text:span text:style-name="T2">(50/11) </text:span> ⲛⲉ ⲟⲩⲱⲧ’ ⲥⲁⲃⲟⲗ ⲛ̅ⲑⲓⲕⲱⲛ <text:line-break/><text:span text:style-name="T1"> </text:span><text:span text:style-name="T2">(50/12) </text:span> ⲙ̅ⲡⲣⲱⲙⲉ· ⲛ̅ⲑⲉ ϩⲱⲱϥ ⲙ̅ⲡⲉ‐ <text:line-break/><text:span text:style-name="T1"> </text:span><text:span text:style-name="T2">(50/13) </text:span> ⲧⲉ ⲙⲛ̅ ϣϭⲟⲙ ⲙ̅ⲙⲟϥ ⲉⲧⲣⲉϥⲛⲁⲩ <text:line-break/><text:span text:style-name="T1"> </text:span><text:span text:style-name="T2">(50/14) </text:span> ⲉⲛⲉⲧⲙ̅ⲡⲉϥϩⲟⲩⲛ· ⲁⲗⲗⲁ ⲡⲉⲧ’‐ <text:line-break/><text:span text:style-name="T1"> </text:span><text:span text:style-name="T2">(50/15) </text:span> {ϩ̅ⲓ}ⲃⲟⲗ ⲙ̅ⲙⲁⲧⲉ ⲡⲉⲧϥ̅ⲛⲁⲩ ⲉⲣⲟϥ· <text:line-break/><text:span text:style-name="T1"> </text:span><text:span text:style-name="T2">(50/16) </text:span> ⲁⲩⲱ ⲉϥⲣ̅ⲫⲉⲛⲉⲥⲑⲁⲓ ϫⲉ ⲉⲣⲉ‐ <text:line-break/><text:span text:style-name="T1"> </text:span><text:span text:style-name="T2">(50/17) </text:span> ⲡⲉϥⲉⲓⲛⲉ ϩⲛ̅ ⲁϣ ⲛ̅ⲍⲱⲟⲛ· ⲁⲩⲱ <text:line-break/><text:span text:style-name="T1"> </text:span><text:span text:style-name="T2">(50/18) </text:span> ϫⲉ ⲛ̅ⲧⲁⲩⲣ̅ⲡⲗⲁⲥⲥⲉ ⲙ̅ⲙⲟϥ <text:line-break/><text:span text:style-name="T1"> </text:span><text:span text:style-name="T2">(50/19) </text:span> ϩⲛ̅ ⲟⲩⲉⲓⲛⲉ ⲛ̅ⲣⲱⲙⲉ· ⲡⲉϫⲁⲉⲓ <text:line-break/><text:span text:style-name="T1"> </text:span><text:span text:style-name="T2">(50/20) </text:span> ⲇⲉ ⲙ̅ⲡⲉⲛⲧⲁϥϫⲟⲟⲥ ϫⲉ ⲥⲣ̅ ⲛⲟϥ‐ <text:line-break/><text:span text:style-name="T1"> </text:span><text:span text:style-name="T2">(50/21) </text:span> ⲣⲉ ⲙ̅ⲡϫⲓ ⲛϭⲟⲛⲥ̅ ⲙ̅ⲡⲣⲱⲙⲉ· <text:line-break/><text:span text:style-name="T1"> </text:span><text:span text:style-name="T2">(50/22) </text:span> ⲡⲉⲧ’ϫⲓ ⲛ̅ϭⲟⲛⲥ̅ ⲛ̅ⲧⲟϥ ⲛ̅ⲧⲙⲏⲧⲉ <text:line-break/><text:span text:style-name="T1"> </text:span><text:span text:style-name="T2">(50/23) </text:span> ⲥⲣ̅ ⲛⲟϥⲣⲉ ⲛⲁϥ ⲁⲛ· ⲟⲩⲧⲉ ⲙⲛ̅‐ <text:line-break/><text:span text:style-name="T1"> </text:span><text:span text:style-name="T2">(50/24) </text:span> ⲧⲁϥ ⲟⲫⲉⲗⲉⲓⲁ ⲙ̅ⲙⲁⲩ· ⲁⲗⲗⲁ <text:line-break/><text:span text:style-name="T1"> </text:span><text:span text:style-name="T2">(50/25) </text:span> ⲡⲉⲧⲣ̅ ⲛⲟϥⲣⲉ ⲛⲁϥ ⲡⲉ ⲡⲁⲓ̈ ⲉⲧⲣⲉϥ‐ <text:line-break/><text:span text:style-name="T1"> </text:span><text:span text:style-name="T2">(50/26) </text:span> ⲧⲉⲩⲟ ⲉϩⲣⲁⲓ̈ ⲙ̅ⲡⲓⲛⲉ ⲛⲓⲙ ⲛ̅ⲑⲏ‐ <text:line-break/><text:span text:style-name="T1"> </text:span><text:span text:style-name="T2">(50/27) </text:span> ⲣⲓⲟⲛ ⲉⲧ’ⲑⲟⲟⲩ· ⲁⲩⲱ ⲛ̅ϥϩⲟ‐ <text:line-break/><text:span text:style-name="T1"> </text:span><text:span text:style-name="T2">(50/28) </text:span> ⲙⲟⲩ ⲙⲛ̅ ⲛ̅ⲉⲓⲛⲉ ⲙ̅ⲡⲙⲟⲩⲉⲓ· <text:line-break/><text:span text:style-name="T1"> </text:span><text:span text:style-name="T2">(50/29) </text:span> ⲡⲣⲱⲙⲉ ⲇⲉ ϥ̅ϩⲛ̅ ⲟⲩⲙⲛ̅ⲧ’ϭⲱⲃ <text:line-break/><text:span text:style-name="T1"> </text:span><text:span text:style-name="T2">(50/30) </text:span> ⲛ̅ⲧⲉⲉⲓⲙⲓⲛⲉ· ⲁⲩⲱ ⲛⲉⲧϥ̅‐ <text:line-break/><text:span text:style-name="T1"> </text:span><text:span text:style-name="T2">(50/31) </text:span> ⲛⲁⲁⲁⲩ ⲧⲏⲣⲟⲩ ϩⲉⲛϭⲱⲃ ⲛⲉ· <text:line-break/><text:span text:style-name="T1"> </text:span><text:span text:style-name="T2">(50/32) </text:span> ϩⲱⲥⲧⲉ ⲛ̅ⲥⲉⲥⲱⲕ ⲙ̅ⲙⲟϥ ⲉ‐ <text:line-break/><text:span text:style-name="T1"> </text:span><text:span text:style-name="T2">(50/33) </text:span> ⲡⲙⲁ ⲉⲧϥ̅ⲣ̅ ϩⲟⲟⲩ ⲉⲣⲟⲟⲩ ⲛ̅ϣⲟ‐ <text:line-break/><text:span text:style-name="T1"> </text:span><text:span text:style-name="T2">(51/1) </text:span> [ⲣⲡ̅’ ⲁ]ⲩ̣ⲱ ⲛ̅ϥ̣[ <text:line-break/><text:span text:style-name="T1"> </text:span><text:span text:style-name="T2">(51/2) </text:span> [....]ⲛ̣ⲏⲑⲉ̣ⲓ̣[ⲁ <text:line-break/><text:span text:style-name="T1"> </text:span><text:span text:style-name="T2">(51/3) </text:span> ⲛⲁϥ ϩⲛ̣̅ ⲟⲩⲉⲡⲓⲥ̣[ <text:line-break/><text:span text:style-name="T1"> </text:span><text:span text:style-name="T2">(51/4) </text:span> ⲁⲗⲗⲁ ⲉϣⲁϥⲉⲓⲣⲉ ⲛ̅[ <text:line-break/><text:span text:style-name="T1"> </text:span><text:span text:style-name="T2">(51/5) </text:span> ⲃⲉ ⲙ̅ⲙⲛ̅ⲧ’ϫⲁϫⲉ ϩⲣⲁⲓ̈ ⲛ̅ϩ̣[ <text:line-break/><text:span text:style-name="T1"> </text:span><text:span text:style-name="T2">(51/6) </text:span> ⲁⲩⲱ ⲙⲛ̅ ⲟⲩⲙⲓϣⲉ ⲉⲩⲟⲩ‐ <text:line-break/><text:span text:style-name="T1"> </text:span><text:span text:style-name="T2">(51/7) </text:span> ⲱⲙ· ⲙⲛ̅ ⲛⲉⲩⲉⲣⲏⲟⲩ ϩⲣⲁⲓ̈ <text:line-break/><text:span text:style-name="T1"> </text:span><text:span text:style-name="T2">(51/8) </text:span> ⲛ̅ϩⲏⲧⲟⲩ· ⲛⲁⲓ̈ ⲅⲁⲣ ⲧⲏⲣⲟⲩ <text:line-break/><text:soft-page-break/><text:span text:style-name="T1"> </text:span><text:span text:style-name="T2">(51/9) </text:span> ⲁϥϫⲟⲟⲩ ⲛ̅ⲟⲩⲟⲛ ⲛⲓⲙ ⲉⲧⲣ̣̅‐ <text:line-break/><text:span text:style-name="T1"> </text:span><text:span text:style-name="T2">(51/10) </text:span> ⲉⲡⲁⲓⲛⲟⲩ ⲙ̅ⲡϫⲓ ⲛϭⲟⲛⲥ̅· <text:line-break/><text:span text:style-name="T1"> </text:span><text:span text:style-name="T2">(51/11) </text:span> ⲟⲩⲕⲟⲩⲛ ϭⲉ ⲡⲉⲧ’ϣⲁϫⲉ <text:line-break/><text:span text:style-name="T1"> </text:span><text:span text:style-name="T2">(51/12) </text:span> ϩⲱⲱϥ ϩⲛ̅ ⲟⲩⲇⲓⲕⲁⲓⲟⲛ ⲥⲣ̅ <text:line-break/><text:span text:style-name="T1"> </text:span><text:span text:style-name="T2">(51/13) </text:span> ⲛⲟϥⲣⲉ ⲛⲁϥ· ⲁⲩⲱ ⲉϥϣⲁⲛ‐ <text:line-break/><text:span text:style-name="T1"> </text:span><text:span text:style-name="T2">(51/14) </text:span> ⲉⲓⲣⲉ ⲛ̅ⲛⲁⲓ̈ ⲛ̅ϥϣⲁϫⲉ ⲛ̅ϩⲏⲧⲟⲩ <text:line-break/><text:span text:style-name="T1"> </text:span><text:span text:style-name="T2">(51/15) </text:span> ⲙ̅ⲫⲟⲩⲛ ⲙ̅ⲡⲣⲱⲙⲉ ⲥⲉⲁ‐ <text:line-break/><text:span text:style-name="T1"> </text:span><text:span text:style-name="T2">(51/16) </text:span> ⲙⲁϩⲧⲉ ϩⲛ̅ ⲟⲩⲧⲁϫⲣⲟ· ⲉⲧⲃⲉ <text:line-break/><text:span text:style-name="T1"> </text:span><text:span text:style-name="T2">(51/17) </text:span> ⲡⲁⲓ̈ ⲛ̅ϩⲟⲩⲟ ϣⲁϥϣⲓⲛⲉ ⲛ̅ⲥⲁ <text:line-break/><text:span text:style-name="T1"> </text:span><text:span text:style-name="T2">(51/18) </text:span> ϥⲓ ⲡⲉⲩⲣⲟⲟⲩϣ ⲛ̅ϥⲥⲁⲛⲟⲩ‐ <text:line-break/><text:span text:style-name="T1"> </text:span><text:span text:style-name="T2">(51/19) </text:span> ϣⲟⲩ· ⲛ̅ⲑⲉ ϩⲱⲱϥ ⲙ̅ⲡⲅⲉ‐ <text:line-break/><text:span text:style-name="T1"> </text:span><text:span text:style-name="T2">(51/20) </text:span> ⲱⲣⲅⲟⲥ ⲉϣⲁϥⲥⲁⲁⲛϣ̅ ⲙ̅ⲡⲉϥ‐ <text:line-break/><text:span text:style-name="T1"> </text:span><text:span text:style-name="T2">(51/21) </text:span> ⲅⲉⲛⲏⲙⲁ ⲙ̅ⲙⲏⲛⲉ· ⲁⲩⲱ ⲛ̅‐ <text:line-break/><text:span text:style-name="T1"> </text:span><text:span text:style-name="T2">(51/22) </text:span> ⲧⲉ ⲛ̅ⲑⲏⲣⲓⲟⲛ ⲛ̅ⲁⲅⲣⲓⲟⲛ ⲣ̅‐ <text:line-break/><text:span text:style-name="T1"> </text:span><text:span text:style-name="T2">(51/23) </text:span> ⲕⲱⲗⲩⲉ ⲙ̅ⲙⲟϥ ⲉⲧⲣⲉϥⲣⲱⲧ’·</text:p>
      <text:p text:style-name="P1"/>
      <text:p text:style-name="P1"/>
      <text:p text:style-name="P3">( codex VI ) The Discourse on the Eighth and Ninth</text:p>
      <text:p text:style-name="P2"><text:span text:style-name="T1"> </text:span><text:span text:style-name="T2">(52/1) </text:span> [ 10+- ]..[ <text:line-break/><text:span text:style-name="T1"> </text:span><text:span text:style-name="T2">(52/2) </text:span> [ⲱ͂ ⲡⲁⲉⲓⲱ]ⲧ’̣ ⲁⲕⲉⲣⲏ[ⲧ’] ⲛ̣ⲁ̣[ⲓ̈] ⲛ̅ⲥⲁϥ̣ <text:line-break/><text:span text:style-name="T1"> </text:span><text:span text:style-name="T2">(52/3) </text:span> [ⲉⲧⲣⲉⲕⲛ̅] ⲡⲁⲙⲉⲉⲩⲉ ⲉϩⲟⲩⲛ <text:line-break/><text:span text:style-name="T1"> </text:span><text:span text:style-name="T2">(52/4) </text:span> [ⲉⲧⲙ]ⲁ̣ϩϣⲙⲟⲩⲛⲉ· ⲁⲩⲱ ⲙⲛ̅‐ <text:line-break/><text:span text:style-name="T1"> </text:span><text:span text:style-name="T2">(52/5) </text:span> [ⲛ̅]ⲥ̣ⲱⲥ ⲛ̅ⲕⲛⲧ̅’ ⲉϩⲟⲩⲛ ⲉⲧⲙⲁϩ‐ <text:line-break/><text:span text:style-name="T1"> </text:span><text:span text:style-name="T2">(52/6) </text:span> ⲯⲉⲓⲧⲉ· ⲡⲉϫⲁⲕ ϫⲉ ⲧⲁⲓ̈ ⲧⲉ ⲧ’‐ <text:line-break/><text:span text:style-name="T1"> </text:span><text:span text:style-name="T2">(52/7) </text:span> ⲧⲁⲝⲓⲥ ⲛ̅ⲧⲡⲁⲣⲁⲇⲟⲥⲓⲥ ⲱ ⲡⲁ‐ <text:line-break/><text:span text:style-name="T1"> </text:span><text:span text:style-name="T2">(52/8) </text:span> ϣⲏⲣⲉ· ⲧⲉⲓ̈ ⲙⲉⲛ ⲧⲉ ⲧ’ⲧⲁⲝⲓⲥ· <text:line-break/><text:span text:style-name="T1"> </text:span><text:span text:style-name="T2">(52/9) </text:span> ⲡⲉⲣⲏⲧ’ ⲇⲉ ⲁϥϣⲱⲡⲉ ⲕⲁⲧⲁ ⲧⲙⲛ̅‐ <text:line-break/><text:span text:style-name="T1"> </text:span><text:span text:style-name="T2">(52/10) </text:span> ⲧ̣ⲣⲱⲙⲉ· ⲁⲉⲓϫⲟⲟⲥ ⲅⲁⲣ ⲛⲁⲕ <text:line-break/><text:span text:style-name="T1"> </text:span><text:span text:style-name="T2">(52/11) </text:span> ⲛ̅ⲧⲁⲣⲓⲣ̅ⲁⲣⲭⲉⲓ ⲙ̅ⲡⲉⲣⲏⲧ’· ⲁⲉⲓ‐ <text:line-break/><text:span text:style-name="T1"> </text:span><text:span text:style-name="T2">(52/12) </text:span> ϫⲟⲟⲥ ⲉϣϫⲉ ⲕⲣ̅ ⲡⲙⲉⲉⲩⲉ ⲙ̅‐ <text:line-break/><text:span text:style-name="T1"> </text:span><text:span text:style-name="T2">(52/13) </text:span> ⲡⲟⲩⲁ ⲡⲟⲩⲁ ⲛ̅ⲛ̅ⲃⲁⲑⲙⲟⲥ· ⲛ̅‐ <text:line-break/><text:span text:style-name="T1"> </text:span><text:span text:style-name="T2">(52/14) </text:span> ⲧⲁⲣⲓϫⲉⲓ ⲡ̅’ⲡ̅ⲛ̅ⲁ̅ {ϩⲓ}ⲧⲛ̅ ⲧⲇⲩⲛⲁ‐ <text:line-break/><text:span text:style-name="T1"> </text:span><text:span text:style-name="T2">(52/15) </text:span> ⲙⲓⲥ· ⲁⲉⲓⲕⲱ ⲛⲁⲕ ⲉϩⲣⲁⲓ̈ ⲛ̅ⲧⲉⲛⲉⲣ‐ <text:line-break/><text:span text:style-name="T1"> </text:span><text:span text:style-name="T2">(52/16) </text:span> ⲅⲉⲓⲁ· ⲉⲧⲛⲟⲏⲥⲓⲥ ⲙⲉⲛ ϣⲟⲟⲡ’ <text:line-break/><text:span text:style-name="T1"> </text:span><text:span text:style-name="T2">(52/17) </text:span> ⲛ̅ϩⲣⲁⲓ̈ ⲛ̅ϩⲏⲧⲕ̅· ϩⲣⲁⲓ̈ ⲛ̅ϩⲏⲧ’ ϩⲱⲥ <text:line-break/><text:span text:style-name="T1"> </text:span><text:span text:style-name="T2">(52/18) </text:span> ⲉⲥⲉⲉⲧ’ ⲛ̅ϭⲓ ⲧⲇⲩⲛⲁⲙⲓⲥ· ⲛ̅‐ <text:line-break/><text:span text:style-name="T1"> </text:span><text:span text:style-name="T2">(52/19) </text:span> ⲧⲁⲣⲓⲱ ⲅⲁⲣ ⲉⲃⲟⲗ ϩⲛ̅ ⲧⲡⲏⲅⲏ <text:line-break/><text:span text:style-name="T1"> </text:span><text:span text:style-name="T2">(52/20) </text:span> ⲉⲧϩⲉϯⲉ ⲛⲏⲉⲓ ⲁⲉⲓϫⲡⲟ· ⲱ͂ <text:line-break/><text:span text:style-name="T1"> </text:span><text:span text:style-name="T2">(52/21) </text:span> ⲡⲁⲉⲓⲱⲧ’ ϣⲁϫⲉ ⲛⲓⲙ· ⲁⲕϫⲟⲟⲩ <text:line-break/><text:span text:style-name="T1"> </text:span><text:span text:style-name="T2">(52/22) </text:span> ⲛⲁⲓ̈ ⲕⲁⲗⲱⲥ· ϯⲣ̅ ⲑⲁⲩⲙⲁ ⲇⲉ <text:line-break/><text:span text:style-name="T1"> </text:span><text:span text:style-name="T2">(52/23) </text:span> ⲙ̅ⲡⲉⲉⲓϣⲁϫⲉ ϯⲛⲟⲩ ⲉⲧⲁⲕ <text:line-break/><text:span text:style-name="T1"> </text:span><text:span text:style-name="T2">(52/24) </text:span> ϫⲟⲟϥ· ⲁⲕϫⲟⲟⲥ ⲅⲁⲣ ϫⲉ ⲧⲇⲩ‐ <text:line-break/><text:span text:style-name="T1"> </text:span><text:span text:style-name="T2">(52/25) </text:span> ⲛⲁⲙⲓⲥ ⲉⲧⲛ̅ϩⲣⲁⲓ̈ ⲛ̅ϩⲏⲧ’ ⲡⲁ‐ <text:line-break/><text:span text:style-name="T1"> </text:span><text:span text:style-name="T2">(52/26) </text:span> ϫⲉϥ ϫⲉ ⲁⲉⲓϫⲡⲁⲥ ⲛ̅ⲑⲉ ⲛ̅ⲛⲓϣⲏ‐ <text:line-break/><text:span text:style-name="T1"> </text:span><text:span text:style-name="T2">(52/27) </text:span> ⲣⲉ ⲉϣⲁⲩϫⲡⲟⲟⲩ· ⲁⲣⲁ ⲱ͂ ⲡⲁ‐ <text:line-break/><text:span text:style-name="T1"> </text:span><text:span text:style-name="T2">(52/28) </text:span> ⲉⲓⲱⲧ’ ⲟⲩⲛ̅ⲧⲁⲓ̈ ϩⲁϩ ⲛ̅ⲥⲟⲛ ⲉϣ‐ <text:line-break/><text:span text:style-name="T1"> </text:span><text:span text:style-name="T2">(52/29) </text:span> ϫⲉ 〈ⲥⲉ〉ⲛⲁⲁⲡⲧ̅’ ⲙⲛ̅ ⲛ̅ϫⲱⲱⲙⲉ· <text:line-break/><text:span text:style-name="T1"> </text:span><text:span text:style-name="T2">(52/30) </text:span> ⲕⲁⲗⲱⲥ ⲱ ⲡⲁϣⲏⲣⲉ ⲡⲉⲓ̈ⲁⲅⲁ‐ <text:line-break/><text:span text:style-name="T1"> </text:span><text:span text:style-name="T2">(52/31) </text:span> ⲑⲟⲛ ⲉϥ{ⲱ}ⲱⲡ’ ⲉⲃⲟⲗ {ϩ̅ⲓ}ⲧⲛ̅ <text:line-break/><text:span text:style-name="T1"> </text:span><text:span text:style-name="T2">(53/1) </text:span> (line 1 lacking) <text:line-break/><text:span text:style-name="T1"> </text:span><text:span text:style-name="T2">(53/2) </text:span> [ 7+- ].[ <text:line-break/><text:span text:style-name="T1"> </text:span><text:span text:style-name="T2">(53/3) </text:span> [..]..[.....].ⲛ .[ <text:line-break/><text:span text:style-name="T1"> </text:span><text:span text:style-name="T2">(53/4) </text:span> [.]. ⲁ̣[.]...[.]ⲛⲉ· ⲁⲩⲱ [ <text:line-break/><text:span text:style-name="T1"> </text:span><text:span text:style-name="T2">(53/5) </text:span> ⲁ[.]...ⲛ̣̅ⲟⲩⲟⲉⲓϣ ⲛⲓ[ⲙ· ⲉ]‐ <text:line-break/><text:span text:style-name="T1"> </text:span><text:span text:style-name="T2">(53/6) </text:span> ⲧⲃⲉ̣ [ⲡ]ⲁ̣ⲓ̣̈ ⲱ ⲡⲁϣⲏⲣⲉ ⲟ[ⲩⲁ]‐ <text:line-break/><text:span text:style-name="T1"> </text:span><text:span text:style-name="T2">(53/7) </text:span> ⲛⲁⲅ’ⲕⲏ ⲉⲣⲟⲕ ⲧⲉ ⲉⲧⲣⲉ̣[ⲕ]‐ <text:line-break/><text:span text:style-name="T1"> </text:span><text:span text:style-name="T2">(53/8) </text:span> ⲥⲟⲩⲱⲛ ⲛⲉⲕⲥⲛⲏⲟⲩ· ⲁⲩⲱ̣ <text:line-break/><text:span text:style-name="T1"> </text:span><text:span text:style-name="T2">(53/9) </text:span> ⲛ̅ⲅ’ⲧⲁⲉⲓⲟⲟⲩ ⲕⲁⲗⲱⲥ ϩⲛ̅ ⲟⲩ‐ <text:line-break/><text:span text:style-name="T1"> </text:span><text:span text:style-name="T2">(53/10) </text:span> ⲡⲉⲧⲉϣϣⲉ· ϩⲱⲥ ⲛ̅ⲧⲁⲩϣ[ⲱ]‐ <text:line-break/><text:span text:style-name="T1"> </text:span><text:span text:style-name="T2">(53/11) </text:span> ⲡⲉ ⲉⲃⲟⲗ ϩⲙ̅ ⲡⲉⲓ̈ⲱⲧ’ ⲛ̅ⲟⲩⲱ[ⲧ’] <text:line-break/><text:span text:style-name="T1"> </text:span><text:span text:style-name="T2">(53/12) </text:span> ⲡϫⲱⲙⲉ ⲅⲁⲣ ⲡϫⲱⲙⲉ ⲁⲉⲓⲣ̅‐ <text:line-break/><text:span text:style-name="T1"> </text:span><text:span text:style-name="T2">(53/13) </text:span> ⲡⲣⲟⲥⲫⲱⲛⲉⲓ ⲙ̅ⲙⲟϥ· ⲁⲉⲓϯ ⲣⲁⲛ <text:line-break/><text:span text:style-name="T1"> </text:span><text:span text:style-name="T2">(53/14) </text:span> ⲉⲣⲟϥ ϩⲱⲥ ⲉⲩϣⲟⲟⲡ’ ⲛ̅ϫⲡⲟ <text:line-break/><text:span text:style-name="T1"> </text:span><text:span text:style-name="T2">(53/15) </text:span> ⲛ̅ⲑⲉ ⲛ̅ⲛⲉⲉⲓϣⲏⲣⲉ· ⲁⲣⲁ ⲱ͂ <text:line-break/><text:span text:style-name="T1"> </text:span><text:span text:style-name="T2">(53/16) </text:span> ⲡⲁⲓ̈ⲱⲧ’ ⲟⲩⲛ̅ⲧⲁⲩ ϩⲱⲟⲩ ⲙ̅‐ <text:line-break/><text:soft-page-break/><text:span text:style-name="T1"> </text:span><text:span text:style-name="T2">(53/17) </text:span> ⲙⲁⲩ· ⲱ͂ ⲡⲁϣⲏⲣⲉ ϩⲉⲛⲡ̅ⲛ̅ⲁ̅‐ <text:line-break/><text:span text:style-name="T1"> </text:span><text:span text:style-name="T2">(53/18) </text:span> ⲧⲓⲕⲟⲛ ⲛⲉ ⲉⲩϣⲟⲟⲡ’ ⲅⲁⲣ ⲛ̅‐ <text:line-break/><text:span text:style-name="T1"> </text:span><text:span text:style-name="T2">(53/19) </text:span> ⲛⲉⲛⲉⲣⲅⲉⲓⲁ ⲉⲩⲣ̅ⲁⲩⲝⲁⲛⲉ <text:line-break/><text:span text:style-name="T1"> </text:span><text:span text:style-name="T2">(53/20) </text:span> ⲛ̅ⲛ̅ⲕⲉⲯⲩⲭⲏ· ⲉⲧⲃⲉ ⲡⲁⲓ̈ ϯϫⲱ <text:line-break/><text:span text:style-name="T1"> </text:span><text:span text:style-name="T2">(53/21) </text:span> ⲙ̅ⲙⲟⲥ ϫⲉ ϩⲉⲛⲁⲧⲙⲟⲩ ⲛⲉ· <text:line-break/><text:span text:style-name="T1"> </text:span><text:span text:style-name="T2">(53/22) </text:span> ⲡⲉⲕϣⲁϫⲉ ⲟⲩⲙⲓⲉ ⲡⲉ ⲙⲛ̅ⲧⲉϥ <text:line-break/><text:span text:style-name="T1"> </text:span><text:span text:style-name="T2">(53/23) </text:span> ⲁⲛⲧⲓⲗⲟⲅⲓⲁ ⲙ̅ⲙⲁⲩ ϫⲓⲛ ϯⲛⲟⲩ· <text:line-break/><text:span text:style-name="T1"> </text:span><text:span text:style-name="T2">(53/24) </text:span> ⲱ͂ ⲡⲁⲉⲓⲱⲧ’ ⲉⲣⲓⲁⲣⲭⲉⲥⲑⲁⲓ ⲙ̅ⲡ‐ <text:line-break/><text:span text:style-name="T1"> </text:span><text:span text:style-name="T2">(53/25) </text:span> ϣⲁϫⲉ ⲛ̅ⲧⲙⲁϩϣⲙⲟⲩⲛⲉ ⲙⲛ̅ <text:line-break/><text:span text:style-name="T1"> </text:span><text:span text:style-name="T2">(53/26) </text:span> ⲧⲙⲁϩⲯⲓⲧⲉ· ⲛ̅ⲅ’ⲟⲡⲧ̅’ ϩⲱⲱⲧ’ <text:line-break/><text:span text:style-name="T1"> </text:span><text:span text:style-name="T2">(53/27) </text:span> ⲙⲛ̅ ⲛⲁⲥⲛⲏⲟⲩ· ⲙⲁⲣⲛ̅ϣⲗⲏⲗ <text:line-break/><text:span text:style-name="T1"> </text:span><text:span text:style-name="T2">(53/28) </text:span> {ⲱ} ⲡⲁϣⲏⲣⲉ ⲁⲡⲉⲓⲱⲧ’ ⲙ̅ⲡⲧⲏ‐ <text:line-break/><text:span text:style-name="T1"> </text:span><text:span text:style-name="T2">(53/29) </text:span> ⲣϥ̅ ⲙⲛ̅ ⲛⲉⲕⲥⲛⲏⲟⲩ ⲉⲧⲉ ⲛⲁ‐ <text:line-break/><text:span text:style-name="T1"> </text:span><text:span text:style-name="T2">(53/30) </text:span> ϣⲏⲣⲉ ⲛⲉ· ϫⲉⲕⲁⲁⲥ ⲉϥⲁϯ ⲙ̅ <text:line-break/><text:span text:style-name="T1"> </text:span><text:span text:style-name="T2">(53/31) </text:span> ⲡ̅’ⲡ̅ⲛ̅ⲁ̅ ⲛ̅ϯ ϣⲁϫⲉ· ⲁϣ ⲧⲉ ⲑⲉ <text:line-break/><text:span text:style-name="T1"> </text:span><text:span text:style-name="T2">(53/32) </text:span> ⲉⲧⲟⲩϣⲗⲏⲗ ⲙ̅ⲙⲟⲥ ⲱ͂ ⲡⲁⲉⲓⲱⲧ’ <text:line-break/><text:span text:style-name="T1"> </text:span><text:span text:style-name="T2">(53/33) </text:span> ⲉⲩϩⲟⲧⲣ̅ ⲉϩⲟⲩⲛ ⲉⲛϫⲱⲱⲙⲉ· <text:line-break/><text:span text:style-name="T1"> </text:span><text:span text:style-name="T2">(53/34) </text:span> ϯⲟⲩⲱϣ ⲱ͂ ⲡⲁⲉⲓⲱⲧ’ ⲁⲧⲣⲓⲡⲓⲑⲉⲥ‐ <text:line-break/><text:span text:style-name="T1"> </text:span><text:span text:style-name="T2">(53/35) </text:span> ⲑⲁⲓ <text:line-break/><text:span text:style-name="T1"> </text:span><text:span text:style-name="T2">(54/2) </text:span> (lines 1 and 2 lacking) <text:line-break/><text:span text:style-name="T1"> </text:span><text:span text:style-name="T2">(54/3) </text:span> [....ⲁ]ⲗ̣ⲗⲁ.[...].ⲩⲁ[ <text:line-break/><text:span text:style-name="T1"> </text:span><text:span text:style-name="T2">(54/4) </text:span> [...ⲁ]ⲛ ⲡⲉ· ⲟⲩⲧ̣ⲉ ⲟⲩⲛⲟ... <text:line-break/><text:span text:style-name="T1"> </text:span><text:span text:style-name="T2">(54/5) </text:span> [..ⲡ]ⲉ· ⲁⲗⲗⲁ ϥⲙⲟⲧ[ⲛ̅ ⲛ̅ϩⲏ]ⲧ̣ⲥ <text:line-break/><text:span text:style-name="T1"> </text:span><text:span text:style-name="T2">(54/6) </text:span> [...]ⲉ ⲙ̅ⲙⲟϥ· ⲁⲩⲱ ⲟⲩⲙⲉ ⲡⲉ <text:line-break/><text:span text:style-name="T1"> </text:span><text:span text:style-name="T2">(54/7) </text:span> [ⲛⲁⲕ] ⲁ̣ⲧⲣⲉⲕⲣ̅ ⲡⲙⲉⲉⲩⲉ ⲛ̅ⲧⲡⲣⲟ‐ <text:line-break/><text:span text:style-name="T1"> </text:span><text:span text:style-name="T2">(54/8) </text:span> ⲕ̣ⲟ̣ⲡⲏ ⲉⲣϣⲱⲡⲉ ⲛⲁⲕ ⲛ̅ⲧⲙⲛ̅‐ <text:line-break/><text:span text:style-name="T1"> </text:span><text:span text:style-name="T2">(54/9) </text:span> ⲧⲣⲙ̅ⲛ̅ϩⲏⲧ’ ϩⲛ̅ ⲛ̅ϫⲱⲙⲉ· ⲱ͂ <text:line-break/><text:span text:style-name="T1"> </text:span><text:span text:style-name="T2">(54/10) </text:span> ⲡ̣ⲁϣⲏⲣⲉ ⲧⲛ̅ⲧⲱⲛⲕ̅ ⲉⲧϣⲟ‐ <text:line-break/><text:span text:style-name="T1"> </text:span><text:span text:style-name="T2">(54/11) </text:span> ⲣ̣ⲡ̅’ ⲛ̅ϩⲏⲗⲓⲕⲓⲁ· ⲛ̅ⲑⲉ ⲛ̅ⲛⲓⲕⲟⲩ‐ <text:line-break/><text:span text:style-name="T1"> </text:span><text:span text:style-name="T2">(54/12) </text:span> ⲉⲓ ⲁⲕϫⲱ ⲛ̅ⲛⲓⲡⲣⲟⲃⲗⲏⲙⲁ ⲛ̅‐ <text:line-break/><text:span text:style-name="T1"> </text:span><text:span text:style-name="T2">(54/13) </text:span> ⲛⲁⲑⲏⲧ’· ⲛ̅ⲛⲁⲛⲟⲏⲧⲟⲛ· ⲱ͂ ⲡⲁ{ⲓ̈}‐ <text:line-break/><text:span text:style-name="T1"> </text:span><text:span text:style-name="T2">(54/14) </text:span> ⲉⲓⲱⲧ’ ⲧⲡⲣⲟⲕⲟⲡⲏ ⲉⲣϣⲱⲡⲉ <text:line-break/><text:span text:style-name="T1"> </text:span><text:span text:style-name="T2">(54/15) </text:span> ⲛⲏⲉⲓ ϯⲛⲟⲩ ⲙⲛ̅ ⲧⲡⲣⲟⲛⲟⲓⲁ <text:line-break/><text:span text:style-name="T1"> </text:span><text:span text:style-name="T2">(54/16) </text:span> ⲕⲁⲧⲁ ⲛ̅ϫⲱⲙⲉ ⲉⲣϣⲱⲡⲉ ⲛⲁⲓ̈ <text:line-break/><text:span text:style-name="T1"> </text:span><text:span text:style-name="T2">(54/17) </text:span> ⲉⲥ̣ϫⲟⲥⲉ ⲁⲡϣⲧⲁ· ⲛⲁⲓ̈ ⲛ̅ϩⲣⲁⲓ̈ <text:line-break/><text:span text:style-name="T1"> </text:span><text:span text:style-name="T2">(54/18) </text:span> ⲛ̅ϩⲏⲧ’ ⲛ̅ϣⲟⲣⲡ̅’· ⲱ͂ ⲡⲁϣⲏⲣⲉ· <text:line-break/><text:span text:style-name="T1"> </text:span><text:span text:style-name="T2">(54/19) </text:span> ϩⲟⲧⲁⲛ ⲉⲕϣⲁⲛⲣ̅ⲛⲟⲉⲓ ⲛ̅ⲧⲁ‐ <text:line-break/><text:span text:style-name="T1"> </text:span><text:span text:style-name="T2">(54/20) </text:span> ⲗⲏⲑⲉⲓⲁ ⲙ̅ⲡⲉⲕϣⲁϫⲉ· ⲕⲛⲁ‐ <text:line-break/><text:span text:style-name="T1"> </text:span><text:span text:style-name="T2">(54/21) </text:span> ϭⲓⲛⲉ ⲛ̅ⲛⲉⲕⲥⲛⲏⲟⲩ ⲉⲩϣⲗⲏⲗ <text:line-break/><text:span text:style-name="T1"> </text:span><text:span text:style-name="T2">(54/22) </text:span> ⲛⲙ̅ⲙⲁⲕ ⲉⲧⲉ ⲛⲁϣⲏⲣⲉ ⲛⲉ· <text:line-break/><text:span text:style-name="T1"> </text:span><text:span text:style-name="T2">(54/23) </text:span> ⲱ͂ ⲡⲁⲉⲓⲱⲧ’ ϯⲣ̅ⲛⲟⲉⲓ ⲁⲛ ⲛ̅ⲕⲉ‐ <text:line-break/><text:span text:style-name="T1"> </text:span><text:span text:style-name="T2">(54/24) </text:span> ⲟⲩⲁ ⲉⲓ ⲙⲏⲧⲓ ⲉⲡⲁⲛⲁⲓ̈ ⲉⲣϣⲱ‐ <text:line-break/><text:span text:style-name="T1"> </text:span><text:span text:style-name="T2">(54/25) </text:span> ⲡⲉ ⲛⲁⲓ̈ ϩⲛ̅ ⲛ̅ϫⲱⲙⲉ· ⲡⲁⲓ̈ ⲉ‐ <text:line-break/><text:span text:style-name="T1"> </text:span><text:span text:style-name="T2">(54/26) </text:span> ⲧⲕ̅ϣⲁϫⲉ ⲉⲣⲟϥ ϫⲉ ⲡⲁⲛⲁⲓ̈ <text:line-break/><text:span text:style-name="T1"> </text:span><text:span text:style-name="T2">(54/27) </text:span> ⲛ̅ⲧⲯⲩⲭⲏ· ⲡⲕⲱⲧ’ ⲉⲣϣⲱ‐ <text:line-break/><text:span text:style-name="T1"> </text:span><text:span text:style-name="T2">(54/28) </text:span> ⲡⲉ ⲛⲁⲕ ⲕⲁⲧⲁ ⲃⲁⲑⲙⲟⲥ· ⲙⲁ‐ <text:line-break/><text:span text:style-name="T1"> </text:span><text:span text:style-name="T2">(54/29) </text:span> ⲣⲉⲧⲛⲟⲏⲥⲓⲥ ϣⲱⲡⲉ ⲛⲁⲕ <text:line-break/><text:soft-page-break/><text:span text:style-name="T1"> </text:span><text:span text:style-name="T2">(54/30) </text:span> ⲁⲩⲱ ⲕⲛⲁⲧⲥⲉⲃⲟ· ⲁⲉⲓⲣ̅ⲛⲟⲓ̈ <text:line-break/><text:span text:style-name="T1"> </text:span><text:span text:style-name="T2">(54/31) </text:span> ⲱ͂ ⲡⲁⲉⲓⲱⲧ’ ⲡⲟⲩⲁ ⲡⲟⲩⲁ ⲛ̅‐ <text:line-break/><text:span text:style-name="T1"> </text:span><text:span text:style-name="T2">(54/32) </text:span> ⲛ̅ϫⲁⲙⲉ· ⲙⲁⲗⲗⲟⲛ ⲇⲉ ⲑⲩ <text:line-break/><text:span text:style-name="T1"> </text:span><text:span text:style-name="T2">(55/1) </text:span> [ 8+- ⲉ]ⲧ̣ϣⲟⲟⲡ’ ϩⲛ̅ [ <text:line-break/><text:span text:style-name="T1"> </text:span><text:span text:style-name="T2">(55/2) </text:span> [.....]ⲱ̣͂ ⲡⲁϣⲏⲣⲉ .[ <text:line-break/><text:span text:style-name="T1"> </text:span><text:span text:style-name="T2">(55/3) </text:span> [.]ϣ̣.[...].. ⲧ̣ⲟ̣[..].[ <text:line-break/><text:span text:style-name="T1"> </text:span><text:span text:style-name="T2">(55/4) </text:span> [.]ⲉ ϩⲛ̅ ϩⲉ̣ⲛ̣ⲥⲙⲟⲩ ⲉⲃⲟⲗ̣ [ϩⲛ̅] <text:line-break/><text:span text:style-name="T1"> </text:span><text:span text:style-name="T2">(55/5) </text:span> ⲛ[ⲉ]ⲛ̣ⲧ̣[ⲁ]ⲩⲉⲣⲁⲩⲝⲁⲛⲉ ⲉ̣[ⲣⲟⲟⲩ] <text:line-break/><text:span text:style-name="T1"> </text:span><text:span text:style-name="T2">(55/6) </text:span> ⲱ͂ ⲡⲁ̣ⲉⲓⲱⲧ’ ⲡϣⲁϫⲉ ⲉ̣[ⲧⲕⲛⲁ]‐ <text:line-break/><text:span text:style-name="T1"> </text:span><text:span text:style-name="T2">(55/7) </text:span> ϫⲟⲟϥ ϯⲛⲁϫⲓ ⲧⲉϥⲇⲩⲛ[ⲁⲙⲓⲥ] <text:line-break/><text:span text:style-name="T1"> </text:span><text:span text:style-name="T2">(55/8) </text:span> ⲛ̅ⲧⲟⲟⲧⲕ̅· ⲛ̅ⲑⲉ ⲉⲧⲁⲩϣⲁϫ̣[ⲉ] <text:line-break/><text:span text:style-name="T1"> </text:span><text:span text:style-name="T2">(55/9) </text:span> ⲉⲣⲟϥ ⲙ̅ⲡⲥⲛⲁⲩ· ⲙⲁⲣⲛ̅ϣⲗⲏⲗ̣ <text:line-break/><text:span text:style-name="T1"> </text:span><text:span text:style-name="T2">(55/10) </text:span> ⲱ ⲡⲁⲉⲓⲱⲧ’· ⲱ͂ ⲡⲁϣⲏⲣⲉ̣ <text:line-break/><text:span text:style-name="T1"> </text:span><text:span text:style-name="T2">(55/11) </text:span> ⲡⲉⲧⲉϣϣⲉ ⲡⲉ ϩⲙ̅ ⲡⲉⲛⲙ[ⲉ]‐ <text:line-break/><text:span text:style-name="T1"> </text:span><text:span text:style-name="T2">(55/12) </text:span> ⲉⲩⲉ ⲧⲏⲣϥ̅ ⲙⲛ̅ ⲡⲉⲛϩⲏⲧ’ ⲧⲏⲣϥ̅ <text:line-break/><text:span text:style-name="T1"> </text:span><text:span text:style-name="T2">(55/13) </text:span> ⲙⲛ̅ ⲧⲉⲛⲯⲩⲭⲏ ⲉⲧⲣⲉⲛϣⲗⲏⲗ <text:line-break/><text:span text:style-name="T1"> </text:span><text:span text:style-name="T2">(55/14) </text:span> ⲉⲡⲛⲟⲩⲧⲉ· ⲛ̅ⲧⲛ̅ⲣ̅ⲁⲓⲧⲉⲓ ⲙ̅‐ <text:line-break/><text:span text:style-name="T1"> </text:span><text:span text:style-name="T2">(55/15) </text:span> ⲙⲟϥ ⲛ̅ⲧⲇⲱⲣⲉⲁ ⲛ̅ⲧⲙⲁϩ‐ <text:line-break/><text:span text:style-name="T1"> </text:span><text:span text:style-name="T2">(55/16) </text:span> ϣⲙⲟⲩⲛⲉ ⲉⲧⲣⲉⲥⲡⲱϩ ϣⲁ‐ <text:line-break/><text:span text:style-name="T1"> </text:span><text:span text:style-name="T2">(55/17) </text:span> ⲣⲟⲛ· ⲁⲩⲱ ⲛ̅ⲧⲉⲡⲟⲩⲁ ⲡⲟⲩⲁ <text:line-break/><text:span text:style-name="T1"> </text:span><text:span text:style-name="T2">(55/18) </text:span> ⲉⲃⲟⲗ {ϩ̅ⲓ}ⲧⲟⲟⲧϥ̅ ϫⲓ ⲡⲉⲧⲉ ⲡⲱϥ <text:line-break/><text:span text:style-name="T1"> </text:span><text:span text:style-name="T2">(55/19) </text:span> ⲡⲉ· ⲡⲱⲕ ⲙⲉⲛ ⲡⲉ ⲁⲧⲣⲉⲕ‐ <text:line-break/><text:span text:style-name="T1"> </text:span><text:span text:style-name="T2">(55/20) </text:span> ⲣ̅ⲛⲟⲉⲓ· ⲡⲱⲉⲓ ϩⲱⲱⲧ’ ⲡⲉ ⲉ‐ <text:line-break/><text:span text:style-name="T1"> </text:span><text:span text:style-name="T2">(55/21) </text:span> ⲧⲣⲁϭⲙ̅ϭⲟⲙ ⲉϫⲱ ⲙ̅ⲡϣⲁϫⲉ <text:line-break/><text:span text:style-name="T1"> </text:span><text:span text:style-name="T2">(55/22) </text:span> ⲉⲃⲟⲗ ϩⲛ̅ ⲧⲡⲏⲅⲏ ⲉⲧ’ϩⲉϯ ⲛⲁⲓ̈· <text:line-break/><text:span text:style-name="T1"> </text:span><text:span text:style-name="T2">(55/23) </text:span> ⲙⲁⲣⲛ̅ϣⲗⲏⲗ ⲱ͂ ⲡⲁⲉⲓⲱⲧ’ <text:line-break/><text:span text:style-name="T1"> </text:span><text:span text:style-name="T2">(55/24) </text:span> ϯⲣ̅ⲉⲡⲓⲕⲁⲗⲉⲓ ⲙ̅ⲙⲟⲕ ⲡⲉ‐ <text:line-break/><text:span text:style-name="T1"> </text:span><text:span text:style-name="T2">(55/25) </text:span> ⲧⲁⲙⲁϩⲧⲉ ⲉϫⲛ̅ ⲧⲙⲛ̅ⲧⲣ̅ⲣⲟ <text:line-break/><text:span text:style-name="T1"> </text:span><text:span text:style-name="T2">(55/26) </text:span> ⲛ̅ⲧϭⲟⲙ· ⲡⲁⲓ̈ ⲉⲧⲉ ⲡⲉϥⲗⲟⲅⲟⲥ <text:line-break/><text:span text:style-name="T1"> </text:span><text:span text:style-name="T2">(55/27) </text:span> ϣⲱⲡⲉ ⲛ̅ϫⲡⲟ ⲛ̅ⲟⲩⲟⲉⲓⲛ <text:line-break/><text:span text:style-name="T1"> </text:span><text:span text:style-name="T2">(55/28) </text:span> ⲛⲉϥϣⲁϫⲉ ⲇⲉ ϩⲉⲛⲁⲧⲙⲟⲩ <text:line-break/><text:span text:style-name="T1"> </text:span><text:span text:style-name="T2">(55/29) </text:span> ⲛⲉ ϩⲉⲛϣⲁ ⲉⲛⲉϩ ⲛⲉ ⲛ̅ⲛⲁⲧ’‐ <text:line-break/><text:span text:style-name="T1"> </text:span><text:span text:style-name="T2">(55/30) </text:span> ϣⲓⲃⲉ· ⲡⲁⲓ̈ ⲉⲧⲉ ⲡⲉϥ’ⲟⲩⲱϣ← <text:line-break/><text:span text:style-name="T1"> </text:span><text:span text:style-name="T2">(55/31) </text:span> ϫⲡⲟ ⲙ̅ⲡⲱⲛϩ̅ ⲛ̅ⲛⲓⲛⲉ ϩⲙ̅ ⲙⲁ <text:line-break/><text:span text:style-name="T1"> </text:span><text:span text:style-name="T2">(55/32) </text:span> ⲛⲓⲙ· ⲧⲉϥⲫⲩⲥⲓⲥ ϯ ⲙⲟⲣⲫⲏ <text:line-break/><text:span text:style-name="T1"> </text:span><text:span text:style-name="T2">(55/33) </text:span> ⲛ̅ⲧⲟⲩⲥⲓⲁ· ⲉⲃⲟⲗ ⲛ̅ϩⲏⲧϥ̅ ⲉⲩⲕⲓⲙ̓ <text:line-break/><text:span text:style-name="T1"> </text:span><text:span text:style-name="T2">(56/1) </text:span> ⲛ̅ϭⲓ ⲛ̅ⲯⲩⲭⲏ ⲛ̣̅ⲧ̣[ⲙⲁϩϣⲙⲟⲩⲛⲉ] <text:line-break/><text:span text:style-name="T1"> </text:span><text:span text:style-name="T2">(56/2) </text:span> [ⲙⲛ̅] ⲛ̅ⲁⲅ’ⲅⲉⲗⲟⲥ [ <text:line-break/><text:span text:style-name="T1"> </text:span><text:span text:style-name="T2">(56/3) </text:span> [....].[.]ⲟⲥ̣.[....]ⲉⲓⲁ.[ <text:line-break/><text:span text:style-name="T1"> </text:span><text:span text:style-name="T2">(56/4) </text:span> [.].ⲛ ⲛⲉⲧ’ϣⲟⲟⲡ’· ⲧ̣ⲉϥⲡ̣[ⲣ]ⲟ̣ⲛⲟ̣[ⲓ]‐ <text:line-break/><text:span text:style-name="T1"> </text:span><text:span text:style-name="T2">(56/5) </text:span> [ⲁ ⲡ]ⲱ̣ϩ ϣⲁ ⲟⲩⲟⲛ ⲛⲓⲙ̣ [....] ⲧ̣ⲟ <text:line-break/><text:span text:style-name="T1"> </text:span><text:span text:style-name="T2">(56/6) </text:span> [..]ϥ̣ϫⲡⲟ ⲛ̅ⲟⲩⲟⲛ ⲛⲓⲙ· ⲡⲉⲣ <text:line-break/><text:span text:style-name="T1"> </text:span><text:span text:style-name="T2">(56/7) </text:span> [...]ⲣ ⲉⲃⲟⲗ ⲙ̅ⲡⲁⲓⲱⲛ ϩⲛ̅ ϩⲙ̅ⲡ̅ⲛ̅ⲁ̅ <text:line-break/><text:span text:style-name="T1"> </text:span><text:span text:style-name="T2">(56/8) </text:span> ⲁ̣ϥ̣ⲥⲱⲛⲧ̅’ ⲛ̅ⲕⲁ ⲛⲓⲙ· ⲡⲉⲧⲉ ⲟⲩⲛ̅‐ <text:line-break/><text:span text:style-name="T1"> </text:span><text:span text:style-name="T2">(56/9) </text:span> ⲧⲁϥ ⲟⲩⲁⲁϥ ϩⲣⲁⲓ̈ ⲛ̅ϩⲏⲧϥ̅· ⲉϥϥⲓ <text:line-break/><text:span text:style-name="T1"> </text:span><text:span text:style-name="T2">(56/10) </text:span> ϩ̣ⲁ ⲟⲩⲟⲛ ⲛⲓⲙ· ⲉϥⲙⲉϩ· ⲡⲛⲟⲩ‐ <text:line-break/><text:span text:style-name="T1"> </text:span><text:span text:style-name="T2">(56/11) </text:span> ⲧ̣ⲉ ⲛ̅ⲁϩⲟⲣⲁⲧⲟⲥ ⲉⲧⲟⲩϣⲁϫⲉ <text:line-break/><text:soft-page-break/><text:span text:style-name="T1"> </text:span><text:span text:style-name="T2">(56/12) </text:span> ⲉⲣⲟϥ ϩⲛ̅ ⲟⲩⲕⲁⲣⲱϥ· ⲥⲉⲕⲓⲙ <text:line-break/><text:span text:style-name="T1"> </text:span><text:span text:style-name="T2">(56/13) </text:span> ⲉⲧⲉϥ{ϩ̅ⲓ}ⲕⲱⲛ ⲉⲩⲣ̅ⲇⲓⲟⲓⲕⲉⲓ ⲙ̅‐ <text:line-break/><text:span text:style-name="T1"> </text:span><text:span text:style-name="T2">(56/14) </text:span> ⲙⲟⲥ ⲁⲩⲱ ⲥ{ⲉ}ⲣ̅ⲇⲓⲟⲓⲕⲉⲓ· ⲡϫⲱ‐ <text:line-break/><text:span text:style-name="T1"> </text:span><text:span text:style-name="T2">(56/15) </text:span> ⲱⲣⲉ ⲛ̅ⲧⲇⲩⲛⲁⲙⲓⲥ ⲡⲉⲧ’ϫⲟⲥⲉ <text:line-break/><text:span text:style-name="T1"> </text:span><text:span text:style-name="T2">(56/16) </text:span> ⲁⲧⲙⲛ̅ⲧ’ⲛⲟϭ· ⲡⲉⲧ’ⲥⲟⲧⲡ̅’ ⲁⲛ‐ <text:line-break/><text:span text:style-name="T1"> </text:span><text:span text:style-name="T2">(56/17) </text:span> ⲧⲁⲉⲓⲟ͂ ⲍ̅ⲱ̅ⲝ̅ⲁ̅ⲑ̅ⲁ̅ⲍ̅ⲱ̅ ⲁ̅ ⲱ̅ⲱ̅ <text:line-break/><text:span text:style-name="T1"> </text:span><text:span text:style-name="T2">(56/18) </text:span> ⲉ̅ⲉ̅ ⲱ̅ⲱ̅ⲱ̅ ⲏ̅ⲏ̅ⲏ̅ ⲱ̅ⲱ̅ⲱ̅ ⲱ̅ <text:line-break/><text:span text:style-name="T1"> </text:span><text:span text:style-name="T2">(56/19) </text:span> ⲏ̅ⲏ̅ ⲱ̅ⲱ̅ⲱ̅ⲱ̅ⲱ̅ⲱ̅ ⲟ̅ⲟ̅ⲟ̅ⲟ̅ⲟ̅ <text:line-break/><text:span text:style-name="T1"> </text:span><text:span text:style-name="T2">(56/20) </text:span> ⲱ̅ⲱ̅ⲱ̅ⲱ̅ⲱ̅ⲱ̅ ⲩ̅ⲩ̅ⲩ̅ⲩ̅ⲩ̅ⲩ̅ <text:line-break/><text:span text:style-name="T1"> </text:span><text:span text:style-name="T2">(56/21) </text:span> ⲱ̅ⲱ̅ⲱ̅ⲱ̅ⲱ̅ⲱ̅ⲱ̅ⲱ̅ⲱ̅ⲱ̅ⲱ̅ⲱ̅ <text:line-break/><text:span text:style-name="T1"> </text:span><text:span text:style-name="T2">(56/22) </text:span> ⲱ̅ⲱ̅ⲱ̅ ⲍ̅ⲱ̅ⲍ̅ⲁ̅ⲍ̅ⲱ̅ⲑ̅ ⲡϫⲟⲓ̈ⲥ <text:line-break/><text:span text:style-name="T1"> </text:span><text:span text:style-name="T2">(56/23) </text:span> ⲙⲁϯ ⲛⲁⲛ ⲛ̅ⲛⲟⲩⲥⲟⲫⲓⲁ ⲉⲃⲟⲗ <text:line-break/><text:span text:style-name="T1"> </text:span><text:span text:style-name="T2">(56/24) </text:span> ϩⲛ̅ ⲧⲉⲕⲇⲩⲛⲁⲙⲓⲥ ⲉⲧ’ⲡⲏϩ <text:line-break/><text:span text:style-name="T1"> </text:span><text:span text:style-name="T2">(56/25) </text:span> ϣⲁⲣⲟⲛ ⲉⲧⲣⲉⲛϫⲱ ⲛⲁⲛ ⲛ̅ⲑⲉ‐ <text:line-break/><text:span text:style-name="T1"> </text:span><text:span text:style-name="T2">(56/26) </text:span> ⲱⲣⲓⲁ ⲛ̅ⲑⲟⲅ’ⲇⲟⲁⲥ ⲙⲛ̅ ⲑⲉⲛⲛⲁⲥ· <text:line-break/><text:span text:style-name="T1"> </text:span><text:span text:style-name="T2">(56/27) </text:span> ⲏⲇⲏ ⲁⲛⲣ̅ ϣⲣ̅ⲡ’ ⲙ̅ⲡⲱϩ ⲉⲑⲉⲃⲇⲟ‐ <text:line-break/><text:span text:style-name="T1"> </text:span><text:span text:style-name="T2">(56/28) </text:span> ⲙⲁⲥ ⲉⲛⲟⲉⲓ ⲛ̅ⲛ̅ⲉⲩⲥⲉⲃⲏⲥ ⲉⲛ‐ <text:line-break/><text:span text:style-name="T1"> </text:span><text:span text:style-name="T2">(56/29) </text:span> ⲣ̅ⲡⲟⲗⲓⲧⲉⲩⲉⲥⲑⲁⲓ ϩⲙ̅ ⲡⲉⲕⲛⲟ‐ <text:line-break/><text:span text:style-name="T1"> </text:span><text:span text:style-name="T2">(56/30) </text:span> ⲙⲟⲥ· ⲁⲩⲱ ⲡⲉⲕⲟⲩⲱϣ <text:line-break/><text:span text:style-name="T1"> </text:span><text:span text:style-name="T2">(56/31) </text:span> ⲧⲛ̅ϫⲱⲕ ⲙ̅ⲙⲟϥ ⲉⲃⲟⲗ ⲛ̅ⲟⲩⲟ‐ <text:line-break/><text:span text:style-name="T1"> </text:span><text:span text:style-name="T2">(56/32) </text:span> ⲉⲓϣ ⲛⲓⲙ· ⲁⲛⲙⲟⲟϣⲉ ⲅⲁⲣ ϩⲛ̅ <text:line-break/><text:span text:style-name="T1"> </text:span><text:span text:style-name="T2">(57/1) </text:span> [ⲧⲉⲕϩⲓⲏ ⲁⲩⲱ ⲁⲛ]ⲕ̣ⲱ ⲛ̅ⲥⲱⲛ <text:line-break/><text:span text:style-name="T1"> </text:span><text:span text:style-name="T2">(57/2) </text:span> [ 9+- ]ⲛ̣̅ⲧ̣ⲣⲉ̣ⲥϣⲱⲡⲉ <text:line-break/><text:span text:style-name="T1"> </text:span><text:span text:style-name="T2">(57/3) </text:span> [ⲛ̅ϭⲓ] ⲧ̣ⲉⲕ̣[ⲑⲉⲱ]ⲣ̣ⲓ̣ⲁ· ⲡϫⲟⲉⲓⲥ ⲙⲁϯ <text:line-break/><text:span text:style-name="T1"> </text:span><text:span text:style-name="T2">(57/4) </text:span> [ⲛⲁ]ⲛ ⲛ̅ⲧ̣ⲁⲗⲏⲑⲉⲓⲁ ϩⲛ̅ ⲑⲓⲕⲱⲛ· <text:line-break/><text:span text:style-name="T1"> </text:span><text:span text:style-name="T2">(57/5) </text:span> ⲙ[ⲁ]ϯ̣ ⲛ̣ⲁ̣ⲛ {ϩ̅ⲓ}ⲧⲙ̅ ⲡ̅ⲛⲁ̅ ⲉⲧⲣⲉⲛ‐ <text:line-break/><text:span text:style-name="T1"> </text:span><text:span text:style-name="T2">(57/6) </text:span> ⲛⲁ̣ⲩ [ⲉ]ⲧ’ⲙⲟⲣⲫⲏ ⲛ̅ⲑⲓⲕⲱⲛ <text:line-break/><text:span text:style-name="T1"> </text:span><text:span text:style-name="T2">(57/7) </text:span> ⲧⲁⲓ̈ ⲉⲧⲉ ⲙⲛ̅ⲧⲉⲥ ϣⲧⲁ ⲙ̅ⲙⲁⲩ· <text:line-break/><text:span text:style-name="T1"> </text:span><text:span text:style-name="T2">(57/8) </text:span> ⲛ̅ⲅ’ϫⲓ ⲙ̅ⲡⲧⲩⲡⲟⲥ ⲙ̅ⲡⲗⲏⲣⲱ‐ <text:line-break/><text:span text:style-name="T1"> </text:span><text:span text:style-name="T2">(57/9) </text:span> ⲙⲁ ⲛ̅ⲧⲟⲟⲧⲛ̅ ⲉⲃⲟⲗ {ϩ̅ⲓ}ⲧⲙ̅ ⲡⲛ̅‐ <text:line-break/><text:span text:style-name="T1"> </text:span><text:span text:style-name="T2">(57/10) </text:span> ⲥⲙⲟⲩ· ⲛ̅ⲅ’ⲥⲟⲩⲱⲛ ⲡ̅’ⲡ̅ⲛ̅ⲁ̅ <text:line-break/><text:span text:style-name="T1"> </text:span><text:span text:style-name="T2">(57/11) </text:span> ⲉⲧⲛ̅ϩⲏⲧⲛ̅· ⲉⲃⲟⲗ ⲅⲁⲣ {ϩ̅ⲓ}ⲧⲟⲟ‐ <text:line-break/><text:span text:style-name="T1"> </text:span><text:span text:style-name="T2">(57/12) </text:span> ⲧⲕ̅ ⲛ̅ⲧⲁⲡⲧⲏⲣϥ̅ ϫⲓ ⲯⲩⲭⲏ· <text:line-break/><text:span text:style-name="T1"> </text:span><text:span text:style-name="T2">(57/13) </text:span> ⲉⲃⲟⲗ ⲅⲁⲣ ⲛ̅ϩⲏⲧⲕ̅ ⲡⲁⲅⲉⲛ‐ <text:line-break/><text:span text:style-name="T1"> </text:span><text:span text:style-name="T2">(57/14) </text:span> ⲛⲏⲧⲟⲥ ⲛ̅ⲧⲁⲡⲅⲉⲛⲏⲧⲟⲛ ϣⲱ‐ <text:line-break/><text:span text:style-name="T1"> </text:span><text:span text:style-name="T2">(57/15) </text:span> ⲡⲉ· ⲡϫⲡⲟ ⲙ̅ⲡⲁⲩⲧⲟⲅⲉⲛⲏⲧⲟⲥ· <text:line-break/><text:span text:style-name="T1"> </text:span><text:span text:style-name="T2">(57/16) </text:span> ⲉϥϣⲟⲟⲡ’ ⲉⲃⲟⲗ {ϩ̅ⲓ}ⲧⲟⲟⲧⲕ̅· <text:line-break/><text:span text:style-name="T1"> </text:span><text:span text:style-name="T2">(57/17) </text:span> ⲡϫⲡⲟ ⲛ̅ⲛ̅ⲅⲉⲛⲛⲏⲧⲟⲛ ⲧⲏ‐ <text:line-break/><text:span text:style-name="T1"> </text:span><text:span text:style-name="T2">(57/18) </text:span> ⲣⲟⲩ ⲉⲧ’ϣⲟⲟⲡ’ ϫⲉⲓ ⲛ̅ⲛ̅ⲗⲟ‐ <text:line-break/><text:span text:style-name="T1"> </text:span><text:span text:style-name="T2">(57/19) </text:span> ⲅⲉⲓⲕⲏ ⲑⲩⲥⲓⲁ ⲛ̅ⲧⲟⲟⲧⲛ̅· <text:line-break/><text:span text:style-name="T1"> </text:span><text:span text:style-name="T2">(57/20) </text:span> ⲛⲁⲓ̈ ⲉⲧⲛ̅ⲧⲛ̅ⲛⲟⲟⲩ ⲙ̅ⲙⲟⲟⲩ <text:line-break/><text:span text:style-name="T1"> </text:span><text:span text:style-name="T2">(57/21) </text:span> ⲛⲁⲕ ⲉϩⲣⲁⲓ̈· ϩⲙ̅ ⲡⲛ̅ϩⲏⲧ’ ⲧⲏ‐ <text:line-break/><text:span text:style-name="T1"> </text:span><text:span text:style-name="T2">(57/22) </text:span> ⲣϥ̅ ⲙⲛ̅ ⲧⲉⲛⲯⲩⲭⲏ ⲙⲛ̅ ⲧⲉⲛ‐ <text:line-break/><text:span text:style-name="T1"> </text:span><text:span text:style-name="T2">(57/23) </text:span> ϭⲟⲙ ⲧⲏⲣⲥ̅· ⲙⲁⲧⲟⲩϫⲉ ⲡⲉⲧ’‐ <text:line-break/><text:span text:style-name="T1"> </text:span><text:span text:style-name="T2">(57/24) </text:span> ϣⲟⲟⲡ’ ⲛ̅ϩⲏⲧⲛ̅ ⲛ̅ⲅ’ϯ ⲛⲁⲛ <text:line-break/><text:span text:style-name="T1"> </text:span><text:span text:style-name="T2">(57/25) </text:span> ⲛ̅ⲧⲥⲟⲫⲓⲁ ⲛ̅ⲛⲁⲧ’ⲙⲟⲩ· <text:line-break/><text:span text:style-name="T1"> </text:span><text:span text:style-name="T2">(57/26) </text:span> ⲙⲁⲣⲛ̅ⲣ̅ⲁⲥⲡⲁⲍⲉ ⲛ̅ⲛⲉⲛ‐ <text:line-break/><text:soft-page-break/><text:span text:style-name="T1"> </text:span><text:span text:style-name="T2">(57/27) </text:span> ⲉⲣⲏⲟⲩ ⲱ͂ ⲡⲁϣⲏⲣⲉ ϩⲛ̅ ⲟⲩ‐ <text:line-break/><text:span text:style-name="T1"> </text:span><text:span text:style-name="T2">(57/28) </text:span> ⲙⲉ· ⲣⲁϣⲉ ⲉϫⲙ̅ ⲡⲁⲓ̈· ⲏⲇⲏ ⲅⲁⲣ <text:line-break/><text:span text:style-name="T1"> </text:span><text:span text:style-name="T2">(57/29) </text:span> ⲉⲃⲟⲗ ⲙ̅ⲙⲟⲟⲩ ⲧⲇⲩⲛⲁⲙⲓⲥ <text:line-break/><text:span text:style-name="T1"> </text:span><text:span text:style-name="T2">(57/30) </text:span> ⲉⲧⲟ ⲛ̅ⲟⲩⲟⲉⲓⲛ ⲛ̅ⲛⲏⲩ ϣⲁⲣⲟⲛ· <text:line-break/><text:span text:style-name="T1"> </text:span><text:span text:style-name="T2">(57/31) </text:span> ϯⲛⲁⲩ ⲅⲁⲣ ϯⲛⲁⲩ ⲉϩⲉⲛⲃⲁ‐ <text:line-break/><text:span text:style-name="T1"> </text:span><text:span text:style-name="T2">(57/32) </text:span> ⲑⲟⲥ ⲉⲙⲁⲩϣ̅ ϣⲁϫⲉ ⲉⲣⲟⲟⲩ· <text:line-break/><text:span text:style-name="T1"> </text:span><text:span text:style-name="T2">(57/33) </text:span> ⲁϣ ⲧⲉ ⲑⲉ ⲉϯⲛⲁϫⲟⲟⲥ ⲛⲁⲕ <text:line-break/><text:span text:style-name="T1"> </text:span><text:span text:style-name="T2">(58/1) </text:span> ⲱ ⲡⲁϣⲏⲣⲉ· ⲉⲧ̣[ <text:line-break/><text:span text:style-name="T1"> </text:span><text:span text:style-name="T2">(58/2) </text:span> ⲑⲁⲓ ϫⲓⲛ ⲧⲟ[ <text:line-break/><text:span text:style-name="T1"> </text:span><text:span text:style-name="T2">(58/3) </text:span> ⲙ̅ⲙⲁ· ⲁϣ ⲧⲉ ⲑ̣[ⲉ ⲉϯⲛⲁϫⲟⲟⲥ ⲉ]‐ <text:line-break/><text:span text:style-name="T1"> </text:span><text:span text:style-name="T2">(58/4) </text:span> ⲡⲧⲏⲣϥ̅· ⲁⲛⲟⲕ ⲡ̣ⲉ̣ [ⲡⲛⲟ]ⲩ̣[ⲥ ⲁⲩⲱ] <text:line-break/><text:span text:style-name="T1"> </text:span><text:span text:style-name="T2">(58/5) </text:span> ϯⲛⲁⲩ ⲉⲕⲉⲛⲟⲩⲥ ⲡⲉⲧ’ⲕ[ⲓⲙ] ⲉⲧ’‐ <text:line-break/><text:span text:style-name="T1"> </text:span><text:span text:style-name="T2">(58/6) </text:span> ⲯⲩⲭⲏ· ϯⲛⲁⲩ ⲉⲡⲉ[ⲧ’]ⲕ̣ⲓ̣ⲙ ⲉⲣⲟⲓ̈ <text:line-break/><text:span text:style-name="T1"> </text:span><text:span text:style-name="T2">(58/7) </text:span> ⲉⲃⲟⲗ ϩⲛ̅ ⲟⲩⲃ̅ϣⲉ ⲉⲥⲟⲩⲁⲁⲃ· ⲕϯ <text:line-break/><text:span text:style-name="T1"> </text:span><text:span text:style-name="T2">(58/8) </text:span> ⲛⲏⲉⲓ ϭⲁⲙ· ϯⲛⲁⲩ ⲉⲣⲟⲉⲓ ϯⲟⲩⲱϣ <text:line-break/><text:span text:style-name="T1"> </text:span><text:span text:style-name="T2">(58/9) </text:span> ⲉϣⲁϫⲉ· ⲟⲩⲛ̅ ⲟⲩⲫⲟⲃⲟⲥ ⲣ̅ⲕⲁ‐ <text:line-break/><text:span text:style-name="T1"> </text:span><text:span text:style-name="T2">(58/10) </text:span> ⲧⲉⲭⲉ ⲙ̅ⲙⲟⲉⲓ· ⲁⲛⲟⲕ ⲁⲉⲓϭⲛ̅ ⲧⲁⲣ‐ <text:line-break/><text:span text:style-name="T1"> </text:span><text:span text:style-name="T2">(58/11) </text:span> ⲭⲏ ⲛ̅ⲧⲇⲩⲛⲁⲙⲓⲥ ⲉⲧ’{ϩ̅ⲓ}ϫⲛ̅ ⲛ̅ⲇⲩ‐ <text:line-break/><text:span text:style-name="T1"> </text:span><text:span text:style-name="T2">(58/12) </text:span> ⲛⲁⲙⲓⲥ ⲧⲏⲣⲟⲩ ⲧⲉⲧⲉ ⲙⲛ̅ⲧⲉⲥ <text:line-break/><text:span text:style-name="T1"> </text:span><text:span text:style-name="T2">(58/13) </text:span> ⲁⲣⲭⲏ· ϯⲛⲁⲩ ⲉⲩⲡⲏⲅⲏ ⲉⲥⲃⲣ̅ⲃⲣ̅ <text:line-break/><text:span text:style-name="T1"> </text:span><text:span text:style-name="T2">(58/14) </text:span> ⲛ̅ϩⲣⲁⲓ̈ ϩⲛ̅ ⲟⲩⲱⲛϩ̅· ⲁⲉⲓϫⲟⲟⲥ ⲱ͂ <text:line-break/><text:span text:style-name="T1"> </text:span><text:span text:style-name="T2">(58/15) </text:span> ⲡⲁϣⲏⲣⲉ ϫⲉ ⲁⲛⲟⲕ ⲡⲉ ⲡⲛⲟⲩⲥ <text:line-break/><text:span text:style-name="T1"> </text:span><text:span text:style-name="T2">(58/16) </text:span> ⲁⲉⲓⲛⲁⲩ ϥϭⲙ̅ϭⲁⲙ ⲁⲛ ⲛ̅ϭⲓ ⲡϣⲁ‐ <text:line-break/><text:span text:style-name="T1"> </text:span><text:span text:style-name="T2">(58/17) </text:span> ϫⲉ ⲉⲩⲱⲛϩ̅ ⲡⲁⲓ̈ ⲉⲃⲟⲗ· ⲑⲟⲅ’ⲇⲟ‐ <text:line-break/><text:span text:style-name="T1"> </text:span><text:span text:style-name="T2">(58/18) </text:span> ⲁⲥ ⲅⲁⲣ ⲧⲏⲣⲥ̅ ⲱ ⲡⲁϣⲏⲣⲉ ⲙⲛ̅ <text:line-break/><text:span text:style-name="T1"> </text:span><text:span text:style-name="T2">(58/19) </text:span> ⲛ̅ⲯⲩⲭⲏ ⲉⲧⲛ̅ϩⲏⲧⲥ̅ ⲙⲛ̅ ⲛ̅ⲁⲅ’‐ <text:line-break/><text:span text:style-name="T1"> </text:span><text:span text:style-name="T2">(58/20) </text:span> ⲅⲉⲗⲟⲥ ⲥⲉⲣ̅ϩⲩⲙⲛⲉⲓ ϩⲛ̅ ⲟⲩⲕⲁ‐ <text:line-break/><text:span text:style-name="T1"> </text:span><text:span text:style-name="T2">(58/21) </text:span> ⲣⲱϥ· ⲁⲛⲟⲕ ⲇⲉ ⲡⲛⲟⲩⲥ ϯⲣ̅‐ <text:line-break/><text:span text:style-name="T1"> </text:span><text:span text:style-name="T2">(58/22) </text:span> ⲛⲟⲉⲓ· ⲁϣ ⲧⲉ ⲑⲉ ⲉⲃⲟⲗ {ϩ̅ⲓ}ⲧⲟⲟⲧ〈ϥ̅〉 <text:line-break/><text:span text:style-name="T1"> </text:span><text:span text:style-name="T2">(58/23) </text:span> ⲉⲣ̅ϩⲩⲙⲛⲉⲓ· ⲁⲕϣⲱⲡⲉ ⲉⲩⲛⲁϣ <text:line-break/><text:span text:style-name="T1"> </text:span><text:span text:style-name="T2">(58/24) </text:span> ϣⲁϫⲉ ⲁⲛ ⲉⲣⲟⲕ· ϯⲕⲁⲣⲁⲉⲓⲧ’ <text:line-break/><text:span text:style-name="T1"> </text:span><text:span text:style-name="T2">(58/25) </text:span> {ⲱ} ⲡⲁⲉⲓⲱⲧ’· ϯⲟⲩⲱϣ ⲉⲣ̅ϩⲩ‐ <text:line-break/><text:span text:style-name="T1"> </text:span><text:span text:style-name="T2">(58/26) </text:span> ⲙⲛⲉⲓ ⲉⲣⲟⲕ ⲉⲉⲓⲕⲁⲣⲁⲉⲓⲧ’· ⲁⲗⲗⲁ <text:line-break/><text:span text:style-name="T1"> </text:span><text:span text:style-name="T2">(58/27) </text:span> ϫⲟⲟϥ ⲁⲛⲟⲕ ⲅⲁⲣ ⲡⲉ ⲡⲛⲟⲩⲥ· <text:line-break/><text:span text:style-name="T1"> </text:span><text:span text:style-name="T2">(58/28) </text:span> ϯⲣ̅ⲛⲟⲉⲓ ⲙ̅ⲡⲛⲟⲩⲥ ⲫⲉⲣⲙⲏⲥ <text:line-break/><text:span text:style-name="T1"> </text:span><text:span text:style-name="T2">(58/29) </text:span> ⲡⲁⲓ̈ ⲉⲧⲉ ⲙⲁⲩϣ ’ϩ←ⲉⲣⲙⲏⲛⲉⲩⲉ <text:line-break/><text:span text:style-name="T1"> </text:span><text:span text:style-name="T2">(58/30) </text:span> ⲙ̅ⲙⲟϥ ⲉϥⲁⲣⲉϩ ϩⲣⲁⲓ̈ ⲛ̅ϩⲏⲧϥ̅· <text:line-break/><text:span text:style-name="T1"> </text:span><text:span text:style-name="T2">(58/31) </text:span> ϯⲣⲁϣⲉ ⲇⲉ ⲱ͂ ⲡⲁⲉⲓⲱⲧ’ ⲉⲓ̈ⲛⲁⲩ <text:line-break/><text:span text:style-name="T1"> </text:span><text:span text:style-name="T2">(58/32) </text:span> ⲉⲣⲟⲕ ⲉⲕⲥⲱⲃⲉ̓ ⲡⲧⲏⲣϥ̅ ⲇⲉ <text:line-break/><text:span text:style-name="T1"> </text:span><text:span text:style-name="T2">(59/1) </text:span> [ⲣⲁϣ]ⲉ· ⲉⲧⲃⲉ ⲡⲁⲓ̈ ⲙⲛ̣̅ ⲗⲁⲁⲩ <text:line-break/><text:span text:style-name="T1"> </text:span><text:span text:style-name="T2">(59/2) </text:span> [ⲛ̅ⲕ]ⲧ̣ⲓⲥⲓⲥ ⲉϥⲛⲁⲣ̣̅ ϭ̣ⲣⲱϩ ϩⲙ̅ <text:line-break/><text:span text:style-name="T1"> </text:span><text:span text:style-name="T2">(59/3) </text:span> [ⲡ]ⲉⲕⲱⲛϩ̅· ⲛ̅ⲧⲟⲕ ⲅⲁⲣ ⲡⲉ ⲡϫⲟ‐ <text:line-break/><text:span text:style-name="T1"> </text:span><text:span text:style-name="T2">(59/4) </text:span> [ⲉⲓ]ⲥ ⲛ̅ⲛⲙ̅ⲡⲟⲗⲉⲓⲧⲏⲥ ϩⲙ̅ ⲙⲁ <text:line-break/><text:span text:style-name="T1"> </text:span><text:span text:style-name="T2">(59/5) </text:span> ⲛ̣[ⲓ]ⲙ̣· ⲧⲉⲕⲡⲣⲟⲛⲟⲓⲁ ϩⲁⲣⲉϩ· <text:line-break/><text:span text:style-name="T1"> </text:span><text:span text:style-name="T2">(59/6) </text:span> ϯⲙⲟⲩⲧⲉ ⲉⲣⲟⲕ ⲡⲉⲓⲱⲧ’ ⲡⲁⲓ‐ <text:line-break/><text:span text:style-name="T1"> </text:span><text:span text:style-name="T2">(59/7) </text:span> ⲱⲛ ⲛ̅ⲛⲁⲓⲱⲛ ⲡ̅’ⲡ̅ⲛ̅ⲁ̅ ⲟ ⲛⲑⲉⲓⲟⲛ <text:line-break/><text:span text:style-name="T1"> </text:span><text:span text:style-name="T2">(59/8) </text:span> ⲁⲩⲱ ϩⲛ̅ ⲟⲩⲡ̅ⲛ̅ⲁ̅ ⲉϥϯ ⲙ̅ⲡⲙⲟⲩ <text:line-break/><text:soft-page-break/><text:span text:style-name="T1"> </text:span><text:span text:style-name="T2">(59/9) </text:span> ⲛ̅ϩⲱⲟⲩ ⲉϫⲛ̅ ⲟⲩⲟⲛ ⲛⲓⲙ· ⲟⲩ <text:line-break/><text:span text:style-name="T1"> </text:span><text:span text:style-name="T2">(59/10) </text:span> ⲡⲉⲧⲕ̅ϫⲱ ⲙ̅ⲙⲟϥ ⲛⲁⲓ̈̓ ⲱ ⲡⲁ‐ <text:line-break/><text:span text:style-name="T1"> </text:span><text:span text:style-name="T2">(59/11) </text:span> ⲉⲓⲱⲧ’ ⲫⲉⲣⲙⲏⲥ ⲉⲧⲃⲉ ⲛⲁⲓ̈ ϯ‐ <text:line-break/><text:span text:style-name="T1"> </text:span><text:span text:style-name="T2">(59/12) </text:span> ϫⲉ ⲗⲁⲁⲩ ⲁⲛ ⲱ ⲡⲁϣⲏⲣⲉ· ⲟⲩⲇⲓ‐ <text:line-break/><text:span text:style-name="T1"> </text:span><text:span text:style-name="T2">(59/13) </text:span> ⲕⲁⲓⲟⲛ ⲅⲁⲣ ⲙ̅ⲡⲛⲟⲩⲧⲉ ⲡⲉ <text:line-break/><text:span text:style-name="T1"> </text:span><text:span text:style-name="T2">(59/14) </text:span> ⲉⲧⲣⲉⲛⲕⲁⲣⲱⲛ ⲁⲡⲉⲧ’ⲑⲏⲡ’· <text:line-break/><text:span text:style-name="T1"> </text:span><text:span text:style-name="T2">(59/15) </text:span> {ⲱ} ⲡⲧⲣ’ⲓ←ⲥⲙⲉⲅⲓⲥⲧⲟⲥ ⲙⲛ̅ⲧⲣⲉ‐ <text:line-break/><text:span text:style-name="T1"> </text:span><text:span text:style-name="T2">(59/16) </text:span> ⲧⲁⲯⲩⲭⲏ ⲣ̅ⲭⲏⲣⲁ ⲁⲧ’ⲑⲉⲱⲣⲉⲓⲁ <text:line-break/><text:span text:style-name="T1"> </text:span><text:span text:style-name="T2">(59/17) </text:span> ⲟ ⲛⲑⲉⲓⲟⲛ· ⲟⲩⲛ̅ ϭⲟⲙ ⲅⲁⲣ <text:line-break/><text:span text:style-name="T1"> </text:span><text:span text:style-name="T2">(59/18) </text:span> ⲙ̅ⲙⲟⲕ ⲉϩⲱⲃ ⲛⲓⲙ̓ ϩⲱⲥ ⲥⲁϩ <text:line-break/><text:span text:style-name="T1"> </text:span><text:span text:style-name="T2">(59/19) </text:span> ⲙ̅ⲡⲙⲁ ⲧⲏⲣϥ̅· ⲕⲟⲧⲕ̅ ⲉϩⲣⲁⲓ̈ ⲉ‐ <text:line-break/><text:span text:style-name="T1"> </text:span><text:span text:style-name="T2">(59/20) </text:span> ⲡ〈ⲥ〉ⲙⲟⲩ ⲱ͂ ⲡⲁϣⲏⲣⲉ ⲛ̅ⲅ’ϫⲟⲟⲥ <text:line-break/><text:span text:style-name="T1"> </text:span><text:span text:style-name="T2">(59/21) </text:span> ⲉⲕⲕⲁⲣⲁⲉⲓⲧ’· ⲉⲣⲓⲁⲓⲧⲉⲓ ⲙ̅ⲡⲉ‐ <text:line-break/><text:span text:style-name="T1"> </text:span><text:span text:style-name="T2">(59/22) </text:span> ⲧⲕ̅ⲟⲩⲁϣϥ̅ ϩⲛ̅ ⲟⲩⲕⲁⲣⲱϥ· <text:line-break/><text:span text:style-name="T1"> </text:span><text:span text:style-name="T2">(59/23) </text:span> ⲛ̅ⲧⲁⲣⲉϥⲟⲩⲱ ⲉϥⲥⲙⲟⲩ ⲁϥ‐ <text:line-break/><text:span text:style-name="T1"> </text:span><text:span text:style-name="T2">(59/24) </text:span> ϫⲓ ϣⲕⲁⲕ ϫⲉ ⲡⲉⲓⲱⲧ’ ⲡⲧⲣⲓⲥ‐ <text:line-break/><text:span text:style-name="T1"> </text:span><text:span text:style-name="T2">(59/25) </text:span> ⲙⲉⲅⲓⲥⲧⲟⲥ ⲟⲩ ⲡⲉϯⲛⲁϫⲟⲟϥ <text:line-break/><text:span text:style-name="T1"> </text:span><text:span text:style-name="T2">(59/26) </text:span> ⲁⲛϫⲉⲓ ⲙ̅ⲡⲉⲉⲓⲟⲩⲟⲉⲓⲛ· ⲁⲩⲱ <text:line-break/><text:span text:style-name="T1"> </text:span><text:span text:style-name="T2">(59/27) </text:span> ⲁⲛⲟⲕ ϯⲛⲁⲩ ⲉⲧⲉⲉⲓⲑⲉⲱⲣⲓⲁ <text:line-break/><text:span text:style-name="T1"> </text:span><text:span text:style-name="T2">(59/28) </text:span> ⲛ̅ⲟⲩⲱⲧ’ ⲛ̅ϩⲣⲁⲓ̈ ⲛ̅ϩⲏⲧⲕ̅· ⲁⲩⲱ <text:line-break/><text:span text:style-name="T1"> </text:span><text:span text:style-name="T2">(59/29) </text:span> ϯⲛⲁⲩ ⲉⲑⲟⲅ’ⲇⲟⲁⲥ ⲙⲛ̅ ⲛ̅ⲯⲩ‐ <text:line-break/><text:span text:style-name="T1"> </text:span><text:span text:style-name="T2">(59/30) </text:span> ⲭⲏ ⲉⲧⲛ̅ϩⲏⲧⲥ̅ ⲙⲛ̅ ⲛ̅ⲁⲅ’ⲅⲉⲗⲟⲥ <text:line-break/><text:span text:style-name="T1"> </text:span><text:span text:style-name="T2">(59/31) </text:span> ⲉⲩⲣ̅ϩⲩⲙⲛⲉⲓ ⲉⲑⲉⲛⲛⲁⲥ ⲙⲛ̅ <text:line-break/><text:span text:style-name="T1"> </text:span><text:span text:style-name="T2">(59/32) </text:span> ⲛⲉⲥⲇⲩⲛⲁⲙⲓⲥ· ⲁⲩⲱ ϯⲛⲁⲩ <text:line-break/><text:span text:style-name="T1"> </text:span><text:span text:style-name="T2">(59/33) </text:span> ⲉⲣⲟϥ ⲉⲩⲛ̅ⲧⲁϥ ⲙ̅ⲙⲁⲩ ⲛ̅ⲧⲉⲩ‐ <text:line-break/><text:span text:style-name="T1"> </text:span><text:span text:style-name="T2">(59/34) </text:span> ⲇⲩⲛⲁⲙⲓⲥ ⲧⲏⲣⲟⲩ ⲉϥⲥⲱⲛⲧ̅’ <text:line-break/><text:span text:style-name="T1"> </text:span><text:span text:style-name="T2">(60/1) </text:span> ⲛ̅〈ⲛⲉⲧ〉ϩⲙ̅ ⲡ̅’ⲡ̅ⲛ̅ⲁ̅· ⲥⲣ̅ ϣⲁⲩ̣ ϫⲓⲛ [ϯⲛⲟⲩ] <text:line-break/><text:span text:style-name="T1"> </text:span><text:span text:style-name="T2">(60/2) </text:span> ⲛ̅ⲧⲛ̅ⲕⲁⲣ̣ⲱ̣ⲛ ϩⲛ̅ ⲟⲩⲙⲛ̅ⲧ̣[ⲡⲣⲟ]‐ <text:line-break/><text:span text:style-name="T1"> </text:span><text:span text:style-name="T2">(60/3) </text:span> ⲡⲉⲧⲏⲥ· ⲙ̅ⲡⲣ̅ϣⲁϫⲉ ⲁⲧ’ⲑⲉⲱ̣[ⲣⲓⲁ] <text:line-break/><text:span text:style-name="T1"> </text:span><text:span text:style-name="T2">(60/4) </text:span> ϫⲓⲛ ⲧⲉⲛⲟⲩ· ϣ̅ϣⲉ ⲁⲣ̅ϩⲩ[ⲙⲛⲉⲓ] <text:line-break/><text:span text:style-name="T1"> </text:span><text:span text:style-name="T2">(60/5) </text:span> ⲁⲡⲉⲓⲱⲧ’ ϣⲁ ⲫⲟⲟⲩ ⲛ̅ⲕⲁ [ⲥ]ⲱ̣‐ <text:line-break/><text:span text:style-name="T1"> </text:span><text:span text:style-name="T2">(60/6) </text:span> ⲙⲁ ⲡⲉⲧⲕ̅ϫⲱ ⲙ̅ⲙⲟϥ· ⲱ͂ ⲡⲁ̣ⲓ̈‐ <text:line-break/><text:span text:style-name="T1"> </text:span><text:span text:style-name="T2">(60/7) </text:span> ⲱⲧ’ ϯⲟⲩⲱϣ ϩⲱⲱⲧ’ ⲉϫⲟⲟϥ <text:line-break/><text:span text:style-name="T1"> </text:span><text:span text:style-name="T2">(60/8) </text:span> ϯⲣ̅ϩⲩⲙⲛⲉⲓ ϩⲣⲁⲓ̈ ⲛ̅ϩⲏⲧ’· ϩⲱⲥ <text:line-break/><text:span text:style-name="T1"> </text:span><text:span text:style-name="T2">(60/9) </text:span> ⲁⲕⲙ̅ⲧⲟⲛ ⲙ̅ⲙⲟⲕ ⲥⲣ̅ϥⲉ ⲁⲡⲥⲙⲟⲩ· <text:line-break/><text:span text:style-name="T1"> </text:span><text:span text:style-name="T2">(60/10) </text:span> ⲁⲕϭⲓⲛⲉ ⲅⲁⲣ ⲙ̅ⲡⲉⲧⲕ̅ϣⲓⲛⲉ ⲛ̅‐ <text:line-break/><text:span text:style-name="T1"> </text:span><text:span text:style-name="T2">(60/11) </text:span> ⲥⲱϥ· ⲟⲩⲡⲉⲧⲉϣϣⲉ ⲇⲉ ⲡⲉ· <text:line-break/><text:span text:style-name="T1"> </text:span><text:span text:style-name="T2">(60/12) </text:span> ⲱ ⲡⲁⲉⲓⲱⲧ’ ⲉⲧⲁⲥⲙⲟⲩ ⲉⲉⲓ‐ <text:line-break/><text:span text:style-name="T1"> </text:span><text:span text:style-name="T2">(60/13) </text:span> ⲙⲏϩ ⲉⲃⲟⲗ ϩⲙ̅ ⲡⲁϩⲏⲧ’· ⲡⲉⲧⲉϣ‐ <text:line-break/><text:span text:style-name="T1"> </text:span><text:span text:style-name="T2">(60/14) </text:span> ϣⲉ ⲇⲉ ⲡⲉ ⲡⲉⲕⲥⲙⲟⲩ ⲉⲧⲕ̅‐ <text:line-break/><text:span text:style-name="T1"> </text:span><text:span text:style-name="T2">(60/15) </text:span> ⲛⲁϫⲟⲟϥ ⲉϩⲣⲁⲓ̈ ⲉⲡⲛⲟⲩⲧⲉ· <text:line-break/><text:span text:style-name="T1"> </text:span><text:span text:style-name="T2">(60/16) </text:span> ⲛ̅ⲥⲉⲥⲁϩϥ̅ ⲉⲡⲉⲉⲓϫⲱⲱⲙⲉ <text:line-break/><text:span text:style-name="T1"> </text:span><text:span text:style-name="T2">(60/17) </text:span> ⲛ̅ⲛⲁⲧ’ⲧⲁⲕⲟ· ϯⲛⲁϫⲟⲟⲩ ⲙ̅‐ <text:line-break/><text:span text:style-name="T1"> </text:span><text:span text:style-name="T2">(60/18) </text:span> ⲡⲥⲙⲟⲩ ⲉϩⲣⲁⲓ̈ ϩⲙ̅ ⲡⲁϩⲏⲧ’ ⲉⲓ̈‐ <text:line-break/><text:span text:style-name="T1"> </text:span><text:span text:style-name="T2">(60/19) </text:span> ⲥⲟⲡ’ⲥⲡ̅’ ⲛ̅ⲑⲁⲏ ⲙ̅ⲡⲧⲏⲣϥ̅· ⲁⲩⲱ <text:line-break/><text:span text:style-name="T1"> </text:span><text:span text:style-name="T2">(60/20) </text:span> ⲧⲁⲣⲭⲏ ⲛ̅ⲧⲁⲣⲭⲏ ⲙ̅ⲡⲍⲏⲧⲏ‐ <text:line-break/><text:span text:style-name="T1"> </text:span><text:span text:style-name="T2">(60/21) </text:span> ⲙⲁ ⲛ̅ⲛ̅ⲣⲱⲙⲉ· ⲫⲉⲩⲣⲉⲙⲁ <text:line-break/><text:soft-page-break/><text:span text:style-name="T1"> </text:span><text:span text:style-name="T2">(60/22) </text:span> ⲛ̅ⲁⲧ’ⲙⲟⲩ· ⲡⲣⲉϥϫⲡⲟ ⲙ̅ⲡⲟⲩ‐ <text:line-break/><text:span text:style-name="T1"> </text:span><text:span text:style-name="T2">(60/23) </text:span> ⲟⲉⲓⲛ ⲙⲛ̅ ⲧⲁⲗⲏⲑⲉⲓⲁ· ⲡⲣⲉϥ‐ <text:line-break/><text:span text:style-name="T1"> </text:span><text:span text:style-name="T2">(60/24) </text:span> ⲥⲓⲧⲉ ⲙ̅ⲡⲗⲟⲅⲟⲥ ⲧⲁⲅⲁⲡⲏ ⲙ̅‐ <text:line-break/><text:span text:style-name="T1"> </text:span><text:span text:style-name="T2">(60/25) </text:span> ⲡⲱⲛϩ̅ ⲛ̅ⲛⲁⲧⲙⲟⲩ· ⲟⲩⲗⲟⲅⲟⲥ <text:line-break/><text:span text:style-name="T1"> </text:span><text:span text:style-name="T2">(60/26) </text:span> ⲉϥϩⲏⲡ’ ϥⲛⲁϣ ϣⲁϫⲉ ⲁⲛ ⲉⲣⲟⲕ <text:line-break/><text:span text:style-name="T1"> </text:span><text:span text:style-name="T2">(60/27) </text:span> ⲡϫⲟⲉⲓⲥ· ⲉⲧⲃⲉ ⲡⲁⲓ̈ ⲡⲁⲛⲟⲩⲥ <text:line-break/><text:span text:style-name="T1"> </text:span><text:span text:style-name="T2">(60/28) </text:span> ⲟⲩⲱϣ ⲣ̅ϩⲩⲙⲛⲉⲓ ⲉⲣⲟⲕ ⲙ̅‐ <text:line-break/><text:span text:style-name="T1"> </text:span><text:span text:style-name="T2">(60/29) </text:span> ⲙⲏⲛⲉ· ⲁⲛⲟⲕ ⲡⲉ ⲡⲟⲣⲅⲁⲛⲟⲛ <text:line-break/><text:span text:style-name="T1"> </text:span><text:span text:style-name="T2">(60/30) </text:span> ⲙ̅ⲡⲉⲕⲡ̅ⲛ̅ⲁ̅· ⲡⲛⲟⲩⲥ ⲡⲉⲕ‐ <text:line-break/><text:span text:style-name="T1"> </text:span><text:span text:style-name="T2">(60/31) </text:span> ⲡⲗⲏⲕⲧⲣⲟⲛ· ⲡⲉⲕϣⲟϫⲛⲉ <text:line-break/><text:span text:style-name="T1"> </text:span><text:span text:style-name="T2">(60/32) </text:span> ⲇⲉ ⲣ̅ⲯⲁⲗⲗⲉⲓ ⲙ̅ⲙⲟⲉⲓ· ϯⲛⲁⲩ <text:line-break/><text:span text:style-name="T1"> </text:span><text:span text:style-name="T2">(61/1) </text:span> ⲉⲣⲟⲉⲓ ⲁⲉⲓϫⲓ ϭⲟⲙ ⲛ̅ⲧⲟⲟⲧⲕ̅ ⲁ‐ <text:line-break/><text:span text:style-name="T1"> </text:span><text:span text:style-name="T2">(61/2) </text:span> ⲡⲉⲕⲙⲁⲉⲓⲉ ⲅⲁⲣ ⲧ[ⲉ]ϩⲁⲛ ⲕⲁ‐ <text:line-break/><text:span text:style-name="T1"> </text:span><text:span text:style-name="T2">(61/3) </text:span> ⲗⲱⲥ ⲱ ⲡⲁϣⲏⲣⲉ· ⲱ͂ ⲡϩⲙⲟⲧ’ <text:line-break/><text:span text:style-name="T1"> </text:span><text:span text:style-name="T2">(61/4) </text:span> [ⲙ]ⲛ̅ⲛ̅ⲥⲁ ⲛⲁⲓ̈· ϯϣⲡ̅’ ϩⲙⲟⲧ’ <text:line-break/><text:span text:style-name="T1"> </text:span><text:span text:style-name="T2">(61/5) </text:span> [ⲉⲉⲓ]ⲣ̅ϩⲩⲙⲛⲉⲓ ⲉⲣⲟⲕ· ⲛ̅ⲧⲁⲉⲓ‐ <text:line-break/><text:span text:style-name="T1"> </text:span><text:span text:style-name="T2">(61/6) </text:span> ϫ[ⲓ] ⲡ̣ⲱⲛϩ̅ ⲅⲁⲣ ⲛ̅ⲧⲟⲟⲧⲕ̅· ⲛ̅‐ <text:line-break/><text:span text:style-name="T1"> </text:span><text:span text:style-name="T2">(61/7) </text:span> ⲧⲁ̣ⲣⲉⲕⲁⲁⲧ’ ⲛ̅ⲥⲟⲫⲟⲥ· ϯ‐ <text:line-break/><text:span text:style-name="T1"> </text:span><text:span text:style-name="T2">(61/8) </text:span> ⲥⲙⲟⲩ ⲉⲣⲟⲕ ϯⲙⲟⲩⲧⲉ ⲙ̅‐ <text:line-break/><text:span text:style-name="T1"> </text:span><text:span text:style-name="T2">(61/9) </text:span> ⲡⲉⲕⲣⲁⲛ ⲉⲧ’ϩⲏⲡ’ ϩⲣⲁⲓ̈ ⲛ̅ϩⲏⲧ’ <text:line-break/><text:span text:style-name="T1"> </text:span><text:span text:style-name="T2">(61/10) </text:span> ⲁ̅ ⲱ̅ ⲉ̅ⲉ̅ ⲱ̅ ⲏ̅ⲏ̅ⲏ̅ ⲱ̅ⲱ̅ⲱ̅ ⲓ̅ⲓ̅ⲓ̅ <text:line-break/><text:span text:style-name="T1"> </text:span><text:span text:style-name="T2">(61/11) </text:span> ⲱ̅ⲱ̅ⲱ̅ⲱ̅ ⲟ̅ⲟ̅ⲟ̅ⲟ̅ⲟ̅ ⲱ̅ⲱ̅ⲱ̅ <text:line-break/><text:span text:style-name="T1"> </text:span><text:span text:style-name="T2">(61/12) </text:span> ⲱ̅ⲱ̅ ⲩ̅ⲩ̅ⲩ̅ⲩ̅ⲩ̅ⲩ̅ ⲱ̅ⲱ̅ <text:line-break/><text:span text:style-name="T1"> </text:span><text:span text:style-name="T2">(61/13) </text:span> ⲱ̅ⲱ̅ⲱ̅ⲱ̅ⲱ̅ⲱ̅ⲱ̅ⲱ̅ⲱ̅ <text:line-break/><text:span text:style-name="T1"> </text:span><text:span text:style-name="T2">(61/14) </text:span> ⲱ̅ⲱ̅ⲱ̅ⲱ̅ⲱ̅ⲱ̅ⲱ̅ⲱ̅ⲱ̅ <text:line-break/><text:span text:style-name="T1"> </text:span><text:span text:style-name="T2">(61/15) </text:span> ⲱ̅ⲱ̅ ⲛ̅ⲧⲟⲕ ⲡⲉ ⲡⲉⲧ’ϣⲟ <text:line-break/><text:span text:style-name="T1"> </text:span><text:span text:style-name="T2">(61/16) </text:span> ⲟⲡ’ ⲙⲛ̅ ⲡ̅’ⲡ̅ⲛ̅ⲁ̅ ϯⲣ̅ϩⲩⲙⲛⲓ <text:line-break/><text:span text:style-name="T1"> </text:span><text:span text:style-name="T2">(61/17) </text:span> ⲉⲣⲟⲕ ϩⲛ̅ ⲟⲩⲙⲛ̅ⲧ’ⲛⲟⲩⲧⲉ <text:line-break/><text:span text:style-name="T1"> </text:span><text:span text:style-name="T2">(61/18) </text:span> ⲱ ⲡⲁϣⲏⲣⲉ ⲡⲉⲉⲓϫⲱⲙⲉ <text:line-break/><text:span text:style-name="T1"> </text:span><text:span text:style-name="T2">(61/19) </text:span> ⲥⲁϩϥ̅ ⲁⲡⲉⲣⲡⲉ ⲛ̅ⲇⲓⲟⲥⲡⲟⲗⲓⲥ· <text:line-break/><text:span text:style-name="T1"> </text:span><text:span text:style-name="T2">(61/20) </text:span> ϩⲛ̅ ϩⲉⲛⲥϩⲁⲓ̈ ⲛ̅ⲥⲁϩⲡⲣⲁⲛϣ̅ <text:line-break/><text:span text:style-name="T1"> </text:span><text:span text:style-name="T2">(61/21) </text:span> ⲉⲕⲣ̅ⲟⲛⲟⲙⲁⲍⲉ ⲉⲑⲟⲅ’ⲇⲟⲁⲥ <text:line-break/><text:span text:style-name="T1"> </text:span><text:span text:style-name="T2">(61/22) </text:span> ⲟⲩⲱⲛϩ̅ ⲉⲃⲟⲗ ⲛ̅ⲑⲉⲛⲛⲁⲥ· <text:line-break/><text:span text:style-name="T1"> </text:span><text:span text:style-name="T2">(61/23) </text:span> ϯⲛⲁⲁⲁⲥ ⲱ ⲡⲁ〈ⲉⲓⲱⲧ’〉 ⲛ̅ⲑⲉ <text:line-break/><text:span text:style-name="T1"> </text:span><text:span text:style-name="T2">(61/24) </text:span> ⲉⲧⲉ ⲕⲟⲩⲁϩ ⲥⲁϩⲛⲉ ⲙ̅ⲙⲟⲥ ϯ‐ <text:line-break/><text:span text:style-name="T1"> </text:span><text:span text:style-name="T2">(61/25) </text:span> ⲛⲟⲩ· ⲱ ⲡⲁ〈ϣⲏⲣⲉ〉 ⲡϣⲁϫⲉ <text:line-break/><text:span text:style-name="T1"> </text:span><text:span text:style-name="T2">(61/26) </text:span> ⲙ̅ⲡϫⲱⲱⲙⲉ ⲥⲁϩϥ̅ ⲁⲛⲥⲧⲏ‐ <text:line-break/><text:span text:style-name="T1"> </text:span><text:span text:style-name="T2">(61/27) </text:span> ⲗⲏ ⲛ̅ⲕⲁⲗⲁⲉⲓⲛⲟⲥ· ⲱ ⲡⲁϣⲏ‐ <text:line-break/><text:span text:style-name="T1"> </text:span><text:span text:style-name="T2">(61/28) </text:span> ⲣⲉ ⲡⲉⲉⲓϫⲱⲙⲉ ϣ̅ϣⲉ ⲉⲥⲁϩϥ̅ <text:line-break/><text:span text:style-name="T1"> </text:span><text:span text:style-name="T2">(61/29) </text:span> ⲉϩⲉⲛⲥⲧⲏⲗⲏ ⲛ̅ⲕⲁⲗⲗⲁⲉⲓⲛⲟⲥ <text:line-break/><text:span text:style-name="T1"> </text:span><text:span text:style-name="T2">(61/30) </text:span> ϩⲛ̅ ϩⲛ̅ⲥϩⲉⲉⲓ ⲛ̅ⲥⲁϩⲡⲣⲁⲉⲓϣ· <text:line-break/><text:span text:style-name="T1"> </text:span><text:span text:style-name="T2">(61/31) </text:span> ⲡⲛⲟⲩⲥ ⲅⲁⲣ ⲟⲩⲁⲁϥ ⲛ̅ⲧⲁϥ‐ <text:line-break/><text:span text:style-name="T1"> </text:span><text:span text:style-name="T2">(61/32) </text:span> ϣⲱⲡⲉ ⲛ̅ⲛⲉⲡⲓⲥⲕⲟⲡⲟⲥ <text:line-break/><text:span text:style-name="T1"> </text:span><text:span text:style-name="T2">(62/1) </text:span> ⲛ̅ⲛⲁⲓ̈ ⲉⲧⲃⲉ ⲡⲁⲓ̈ ϯⲣ̅ⲕⲉⲗⲉⲩⲉ <text:line-break/><text:span text:style-name="T1"> </text:span><text:span text:style-name="T2">(62/2) </text:span> ⲁⲧⲣⲉⲩϣ̣ⲟϫⲧ̅’ ⲙ̅ⲡⲉⲉⲓϣⲁϫⲉ̣ <text:line-break/><text:span text:style-name="T1"> </text:span><text:span text:style-name="T2">(62/3) </text:span> ⲁⲡⲱⲛⲉ ⲛ̅ⲅ’ⲕⲁⲁϥ ⲛ̅ϩⲟⲩⲛ̣ [ⲙ̅]‐ <text:line-break/><text:span text:style-name="T1"> </text:span><text:span text:style-name="T2">(62/4) </text:span> ⲡⲁⲟⲩⲱⲡⲉ· ⲉⲩⲛ̅ ϣⲙⲟⲩ[ⲛ ⲙ̅]‐ <text:line-break/><text:soft-page-break/><text:span text:style-name="T1"> </text:span><text:span text:style-name="T2">(62/5) </text:span> ⲫⲩⲗⲁⲝ̓ ⲣⲟⲉⲓⲥ ⲉⲣⲟϥ ⲙⲛ̅ [.].. <text:line-break/><text:span text:style-name="T1"> </text:span><text:span text:style-name="T2">(62/6) </text:span> ⲙ̅ⲫⲏⲗⲓⲟⲥ· ⲛ̅ϩⲟⲟⲩⲧ’ ⲙ[ⲉ]ⲛ <text:line-break/><text:span text:style-name="T1"> </text:span><text:span text:style-name="T2">(62/7) </text:span> {ϩ̅ⲓ} ⲟⲩⲛⲁⲙ ⲉⲩⲉ ⲙ̅ⲡⲣⲟⲥⲱ‐ <text:line-break/><text:span text:style-name="T1"> </text:span><text:span text:style-name="T2">(62/8) </text:span> ⲡ{ⲣ}ⲟⲛ ⲛ̅ⲕⲣⲟⲩⲣ· ⲛ̅{ϩ̅ⲓ}ⲟⲙⲉ ⲇⲉ <text:line-break/><text:span text:style-name="T1"> </text:span><text:span text:style-name="T2">(62/9) </text:span> {ϩ̅ⲓ} ϭⲃⲟⲩⲣ ⲉⲩⲉ ⲙ̅ⲡⲣⲟⲥⲱⲡⲟⲛ <text:line-break/><text:span text:style-name="T1"> </text:span><text:span text:style-name="T2">(62/10) </text:span> ⲛ̅ⲉⲙⲟⲩ· ⲕⲱ ⲛ̅ⲇⲉ ⲛ̅ⲟⲩⲱⲛⲉ <text:line-break/><text:span text:style-name="T1"> </text:span><text:span text:style-name="T2">(62/11) </text:span> ⲛ̅ⲅⲁⲗⲁⲕⲧⲓⲧⲏⲥ ⲙ̅ⲡⲓⲧⲛ̅ ⲛ̅ⲛ̅‐ <text:line-break/><text:span text:style-name="T1"> </text:span><text:span text:style-name="T2">(62/12) </text:span> ⲡⲗⲁⲝ ⲛ̅ⲕⲁⲗⲗⲁⲉⲓⲛⲏ ⲉϥⲉ ⲛ̅ⲧⲉ‐ <text:line-break/><text:span text:style-name="T1"> </text:span><text:span text:style-name="T2">(62/13) </text:span> ⲧⲣⲁⲅⲱⲛⲟⲛ ⲛ̅ⲅ’ⲥϩⲁⲓ̈ ⲡⲣⲁⲛ ⲉⲧ’‐ <text:line-break/><text:span text:style-name="T1"> </text:span><text:span text:style-name="T2">(62/14) </text:span> ⲡⲗⲁⲝ ⲛ̅ⲱⲛⲉ ⲛ̅ⲥⲁⲡ’ⲡⲉⲓⲣⲓⲛⲟⲛ· <text:line-break/><text:span text:style-name="T1"> </text:span><text:span text:style-name="T2">(62/15) </text:span> ϩⲛ̅ ϩⲛ̅ⲥϩⲁ{ⲉ̅ⲓ} ⲛ̅ⲥⲁϩⲡⲣⲁⲉⲓϣ· <text:line-break/><text:span text:style-name="T1"> </text:span><text:span text:style-name="T2">(62/16) </text:span> ⲱ ⲡⲁϣⲏⲣⲉ ⲉⲕⲛⲁⲕⲱ ⲙ̅ⲡⲁⲓ̈ <text:line-break/><text:span text:style-name="T1"> </text:span><text:span text:style-name="T2">(62/17) </text:span> ⲉⲓ̈ϣⲟⲟⲡ’ ϩⲛ̅ ⲧⲡⲁⲣⲑⲉⲛⲟⲥ <text:line-break/><text:span text:style-name="T1"> </text:span><text:span text:style-name="T2">(62/18) </text:span> ⲙⲛ̅ ⲡⲣⲏ ϩⲛ̅ ⲡϭⲥ̅ ⲟⲩⲉⲓⲉ ⲙ̅ⲡⲉ‐ <text:line-break/><text:span text:style-name="T1"> </text:span><text:span text:style-name="T2">(62/19) </text:span> ϩⲟⲟⲩ· ⲁⲙⲛ̅ⲧⲏ ⲙ̅ⲙⲟⲓⲣⲁ ⲣ̅ⲡⲁ‐ <text:line-break/><text:span text:style-name="T1"> </text:span><text:span text:style-name="T2">(62/20) </text:span> ⲣⲁⲅⲉ ⲙ̅ⲙⲟⲉ{ⲓ̅·̅ ̅ⲱ} ⲡⲁⲉⲓⲱⲧ’ ϣⲁ‐ <text:line-break/><text:span text:style-name="T1"> </text:span><text:span text:style-name="T2">(62/21) </text:span> ϫⲉ ⲛⲓⲙ ⲉⲧⲕ̅ϫⲱ ⲙ̅ⲙⲟⲟⲩ ϯⲛⲁ‐ <text:line-break/><text:span text:style-name="T1"> </text:span><text:span text:style-name="T2">(62/22) </text:span> ⲁⲁⲩ ϩⲛ̅ ⲟⲩⲟⲩⲣⲁⲧ’· ⲥϩⲁⲓ̈ ⲇⲉ ⲛ̅‐ <text:line-break/><text:span text:style-name="T1"> </text:span><text:span text:style-name="T2">(62/23) </text:span> ⲟⲩⲁⲛⲁϣ ⲉⲡϫⲱⲙⲉ ⲙⲏⲡⲱⲥ <text:line-break/><text:span text:style-name="T1"> </text:span><text:span text:style-name="T2">(62/24) </text:span> ⲧⲟⲛⲟⲙⲁⲥⲓⲁ ⲛ̅ⲛⲟⲩⲛ̅ⲧⲥ̅ ⲉϩⲟⲩⲛ <text:line-break/><text:span text:style-name="T1"> </text:span><text:span text:style-name="T2">(62/25) </text:span> ϩⲛ̅ ⲟⲩⲕⲁⲕⲟⲩⲣⲅⲓⲁ ⲛ̅ϭⲓ ⲛⲉⲧ’‐ <text:line-break/><text:span text:style-name="T1"> </text:span><text:span text:style-name="T2">(62/26) </text:span> ⲛⲁⲱϣ ⲙ̅ⲡϫⲱⲱⲙⲉ· ⲟⲩⲧⲉ <text:line-break/><text:span text:style-name="T1"> </text:span><text:span text:style-name="T2">(62/27) </text:span> ⲉⲧⲙ̅ϯ ⲟⲩⲃⲉ ⲛ̅ϩⲃⲏⲟⲩⲉ ⲛ̅ϫⲓ‐ <text:line-break/><text:span text:style-name="T1"> </text:span><text:span text:style-name="T2">(62/28) </text:span> ⲙⲁⲣⲙⲉⲛⲏ· ⲉⲩⲛⲁⲣ̅ⲥⲧⲟⲓⲭⲉⲓ <text:line-break/><text:span text:style-name="T1"> </text:span><text:span text:style-name="T2">(62/29) </text:span> ⲛ̅ⲧⲟϥ ⲉⲡⲛⲟⲙⲟⲥ ⲙ̅ⲡⲛⲟⲩⲧⲉ· <text:line-break/><text:span text:style-name="T1"> </text:span><text:span text:style-name="T2">(62/30) </text:span> ⲉⲙⲡⲟⲩⲣ̅ⲡⲁⲣⲁⲃⲁ ⲣⲱ ⲧⲏⲣϥ̅· <text:line-break/><text:span text:style-name="T1"> </text:span><text:span text:style-name="T2">(62/31) </text:span> ⲁⲗⲗⲁ ϩⲛ̅ ⲟⲩⲧⲃ̅ⲃⲟ ⲉⲩⲣ̅ⲁⲓⲧⲉⲓ <text:line-break/><text:span text:style-name="T1"> </text:span><text:span text:style-name="T2">(62/32) </text:span> ⲙ̅ⲡⲛⲟⲩⲧⲉ ⲛ̅ⲛⲟⲩⲥⲟⲫⲓⲁ ⲙⲛ̅ <text:line-break/><text:span text:style-name="T1"> </text:span><text:span text:style-name="T2">(62/33) </text:span> ⲟⲩⲅⲛⲱⲥⲓⲥ· ⲁⲩⲱ ⲡⲉⲧⲟⲩ‐ <text:line-break/><text:span text:style-name="T1"> </text:span><text:span text:style-name="T2">(63/1) </text:span> ⲛⲁϫⲡⲟϥ ⲁⲛ ⲛ̅ϣⲟⲣⲡ̅’ ϩⲙ̅ ⲡⲛⲟⲩ‐ <text:line-break/><text:span text:style-name="T1"> </text:span><text:span text:style-name="T2">(63/2) </text:span> ⲧⲉ· ϥϣⲱⲡⲉ ϩⲛ̅ ⲛ̅[ⲅ]ⲉⲛⲓⲕⲟⲥ <text:line-break/><text:span text:style-name="T1"> </text:span><text:span text:style-name="T2">(63/3) </text:span> ⲗ̣ⲟⲅⲟⲥ ⲙⲛ̅ ⲛ̅ⲉⲝⲱⲇⲓⲁⲕⲟⲥ· <text:line-break/><text:span text:style-name="T1"> </text:span><text:span text:style-name="T2">(63/4) </text:span> ϥⲛⲁϣ ⲱϣ ⲁⲛ ⲛ̅ⲛⲉⲧ’ⲥⲏϩ <text:line-break/><text:span text:style-name="T1"> </text:span><text:span text:style-name="T2">(63/5) </text:span> ϩⲙ̅ ⲡⲉⲓ̈ϫⲱⲱⲙⲉ ⲉⲧⲉϥⲥⲩⲛ‐ <text:line-break/><text:span text:style-name="T1"> </text:span><text:span text:style-name="T2">(63/6) </text:span> ⲉⲓⲇⲏⲥⲓⲥ ⲧⲟⲩⲃⲁⲉⲓⲧ’ ⲉⲣⲟϥ· ⲉϥ‐ <text:line-break/><text:span text:style-name="T1"> </text:span><text:span text:style-name="T2">(63/7) </text:span> ⲉⲓⲣⲉ ⲁⲛ ⲛ̅ⲗⲁⲁⲩ ⲛ̅ϩⲱⲃ ⲉϥϣⲁ‐ <text:line-break/><text:span text:style-name="T1"> </text:span><text:span text:style-name="T2">(63/8) </text:span> ⲗⲉϥ· ⲉϥⲣ̅ⲥⲩⲛⲉⲩⲇⲟϭⲉⲓ ⲁⲛ <text:line-break/><text:span text:style-name="T1"> </text:span><text:span text:style-name="T2">(63/9) </text:span> ⲛⲙ̅ⲙⲁϥ· ⲁⲗⲗⲁ ⲕⲁⲧⲁ ⲃⲁⲑⲙⲟⲥ <text:line-break/><text:span text:style-name="T1"> </text:span><text:span text:style-name="T2">(63/10) </text:span> ⲉϥⲙⲟⲟϣⲉ ⲉϥⲛ̅ⲛⲏⲩ ⲉϩⲟⲩⲛ <text:line-break/><text:span text:style-name="T1"> </text:span><text:span text:style-name="T2">(63/11) </text:span> ⲉⲑⲓⲏ ⲛ̅ⲧⲙⲛ̅ⲧ’ⲁⲧ’ⲙⲟⲩ· ⲁⲩⲱ <text:line-break/><text:span text:style-name="T1"> </text:span><text:span text:style-name="T2">(63/12) </text:span> ⲛ̅ϯϩⲉ ⲉϥⲛ̅ⲛⲏⲩ ⲉϩⲟⲩⲛ ⲉⲧ’‐ <text:line-break/><text:span text:style-name="T1"> </text:span><text:span text:style-name="T2">(63/13) </text:span> ⲛⲟⲏⲥⲓⲥ ⲛ̅ⲑⲟⲅ’ⲇⲟⲁⲥ ⲉⲧⲟⲩ‐ <text:line-break/><text:span text:style-name="T1"> </text:span><text:span text:style-name="T2">(63/14) </text:span> ⲱⲛϩ̅ ⲉⲃⲟⲗ ⲛ̅ⲑⲉⲛⲛⲁⲥ ϯϩⲉ <text:line-break/><text:span text:style-name="T1"> </text:span><text:span text:style-name="T2">(63/15) </text:span> ϯⲛⲁⲁⲁⲥ· ⲱ͂ ⲡⲁⲉⲓⲱⲧ’ ⲡⲁⲓ̈ <text:line-break/><text:span text:style-name="T1"> </text:span><text:span text:style-name="T2">(63/16) </text:span> ⲡⲉⲛⲁϣ ϯⲧⲁⲣⲕⲟ ⲙ̅ⲡⲉⲧⲛⲁ‐ <text:line-break/><text:span text:style-name="T1"> </text:span><text:span text:style-name="T2">(63/17) </text:span> ⲱϣ ⲙ̅ⲡⲉⲉⲓϫⲱⲱⲙⲉ ’ⲉⲧⲟⲩⲁⲁⲃ← ⲛ̅ⲧⲡⲉ <text:line-break/><text:span text:style-name="T1"> </text:span><text:span text:style-name="T2">(63/18) </text:span> ⲙⲛ̅ ⲡⲕⲁϩ ⲙⲛ̅ ⲡⲕⲱϩⲧ̅’ ⲙⲛ̅ ⲡⲙⲟ‐ <text:line-break/><text:soft-page-break/><text:span text:style-name="T1"> </text:span><text:span text:style-name="T2">(63/19) </text:span> ⲟⲩ· ⲙⲛ̅ ⲥⲁϣϥ̅ ⲛ̅ⲛⲟⲩⲥⲓⲁⲣⲭⲏⲥ <text:line-break/><text:span text:style-name="T1"> </text:span><text:span text:style-name="T2">(63/20) </text:span> ⲙⲛ̅ ⲡ̅’ⲡ̅ⲛ̅ⲁ̅ ⲉⲧⲛ̅ϩⲏⲧⲟⲩ ⲛ̅ⲣⲉϥ‐ <text:line-break/><text:span text:style-name="T1"> </text:span><text:span text:style-name="T2">(63/21) </text:span> ⲥⲱⲛⲧ̅’· ⲙⲛ̅ ⲡⲛⲟⲩⲧⲉ ⲛ̅〈ⲁⲅⲉ〉ⲛ{ⲏ} <text:line-break/><text:span text:style-name="T1"> </text:span><text:span text:style-name="T2">(63/22) </text:span> ⲛⲏⲧⲟⲥ ⲙⲛ̅ ⲡⲁⲩⲧⲟⲅⲉⲛⲛⲏ〈ⲥ〉 <text:line-break/><text:span text:style-name="T1"> </text:span><text:span text:style-name="T2">(63/23) </text:span> ⲙⲛ̅ ⲡⲉⲛⲧⲁⲩϫⲡⲟϥ ⲉⲧⲣⲉϥⲣ̅ⲧⲏ‐ <text:line-break/><text:span text:style-name="T1"> </text:span><text:span text:style-name="T2">(63/24) </text:span> ⲣⲉⲓ ⲛ̅ⲛⲉⲛⲧⲁⲫⲉⲣⲙⲏⲥ ϫⲟⲟⲩ· <text:line-break/><text:span text:style-name="T1"> </text:span><text:span text:style-name="T2">(63/25) </text:span> ⲛⲉⲧⲛⲁⲣ̅ⲧⲏⲣⲉⲓ ⲇⲉ ⲙ̅ⲡⲁⲛⲁϣ <text:line-break/><text:span text:style-name="T1"> </text:span><text:span text:style-name="T2">(63/26) </text:span> ⲡⲛⲟⲩⲧⲉ ⲛⲁϩⲱⲧⲡ̅’ ⲛⲙ̅ⲙⲁⲩ <text:line-break/><text:span text:style-name="T1"> </text:span><text:span text:style-name="T2">(63/27) </text:span> ⲙⲛ̅ ⲟⲩⲟⲛ ⲛⲓⲙ ⲉⲛⲧⲁⲛⲣ̅ⲟⲛⲟ‐ <text:line-break/><text:span text:style-name="T1"> </text:span><text:span text:style-name="T2">(63/28) </text:span> ⲙⲁⲍⲉ ⲙ̅ⲙⲟⲟⲩ· ⲛⲉⲧⲛⲁⲣ̅‐ <text:line-break/><text:span text:style-name="T1"> </text:span><text:span text:style-name="T2">(63/29) </text:span> ⲡⲁⲣⲁⲃⲁ ⲇⲉ ⲙ̅ⲡⲁⲛⲁϣ· ⲧⲟⲣⲅⲏ <text:line-break/><text:span text:style-name="T1"> </text:span><text:span text:style-name="T2">(63/30) </text:span> ⲙ̅ⲡⲟⲩⲁ ⲡⲟⲩⲁ ⲛ̅ⲛⲏⲟⲩ ⲉϩⲣⲁⲓ̈ <text:line-break/><text:span text:style-name="T1"> </text:span><text:span text:style-name="T2">(63/31) </text:span> ⲉϫⲱϥ ⲡⲁⲓ̈ ⲡⲉ ⲡⲧⲉⲗⲉⲓⲟⲥ ⲉⲧ’‐ <text:line-break/><text:span text:style-name="T1"> </text:span><text:span text:style-name="T2">(63/32) </text:span> ϣⲟⲟⲡ’ ⲱ ⲡⲁϣⲏⲣⲉ· </text:p>
      <text:p text:style-name="P1"/>
      <text:p text:style-name="P3">( codex VI ) The Prayer of Thanksgiving</text:p>
      <text:p text:style-name="P2"><text:span text:style-name="T1"> </text:span><text:span text:style-name="T2">(63/33) </text:span> ⲡⲁⲓ̈ ⲡⲉ ⲡϣⲗⲏⲗ ⲛ̅ⲧⲁⲩϫⲟⲟϥ· <text:line-break/><text:span text:style-name="T1"> </text:span><text:span text:style-name="T2">(63/34) </text:span> ⲧⲛ̅ϣⲡ̅’ ϩⲙⲟⲧ’ ⲛ̅ⲧⲟⲟⲧⲕ̅ ⲯⲩⲭⲏ <text:line-break/><text:span text:style-name="T1"> </text:span><text:span text:style-name="T2">(63/35) </text:span> ⲛⲓⲙ· ⲁⲩⲱ ⲫⲏⲧ’ ⲡⲟⲣϣ̅ ϣⲁⲣⲟⲕ <text:line-break/><text:span text:style-name="T1"> </text:span><text:span text:style-name="T2">(63/36) </text:span> ⲱ͂ ⲡⲓⲣⲁⲛ ⲉⲩⲣ̅ⲉⲛⲱⲭⲗⲉⲓ ⲛⲁϥ ⲁⲛ· <text:line-break/><text:span text:style-name="T1"> </text:span><text:span text:style-name="T2">(64/1) </text:span> ⲉϥⲧⲁⲉⲓⲁⲉⲓⲧ’ ϩⲛ̅ ⲧⲟⲛⲟⲙⲁⲥⲓⲁ <text:line-break/><text:span text:style-name="T1"> </text:span><text:span text:style-name="T2">(64/2) </text:span> ⲙ̅ⲡⲛⲟⲩ[ⲧ]ⲉ· ⲁⲩⲱ ⲉⲩⲥⲙⲟⲩ <text:line-break/><text:span text:style-name="T1"> </text:span><text:span text:style-name="T2">(64/3) </text:span> ⲉⲣⲟϥ ϩⲛ̅ ⲧⲟⲛⲟⲙⲁⲥⲓⲁ ⲙ̅ⲡⲓⲱ[ⲧ’] <text:line-break/><text:span text:style-name="T1"> </text:span><text:span text:style-name="T2">(64/4) </text:span> ϫⲉ ϣⲁ ⲟⲩⲟⲛ ⲛⲓⲙ· ⲁⲩⲱ ϣⲁ ⲡⲧⲏ‐ <text:line-break/><text:span text:style-name="T1"> </text:span><text:span text:style-name="T2">(64/5) </text:span> ⲣϥ̅· ⲧⲉⲩⲛⲟⲓⲁ ⲙ̅ⲡⲉⲓⲱⲧ’ ⲙⲛ̅ <text:line-break/><text:span text:style-name="T1"> </text:span><text:span text:style-name="T2">(64/6) </text:span> ⲡⲙⲉ ⲙⲛ̅ ⲡⲟⲩ{ⲟⲩ}ⲱϣ· ⲁⲩⲱ <text:line-break/><text:span text:style-name="T1"> </text:span><text:span text:style-name="T2">(64/7) </text:span> ⲉϣϫⲉ ⲟⲩⲛ̅ ⲟⲩⲥⲃⲱ ⲉⲥϩⲁⲗⲉϭ <text:line-break/><text:span text:style-name="T1"> </text:span><text:span text:style-name="T2">(64/8) </text:span> ⲉⲥⲟ ⲛ̅ϩⲁⲡⲗⲟⲩⲥ· ⲉⲥⲣ̅ⲭⲁⲣⲓⲍⲉ <text:line-break/><text:span text:style-name="T1"> </text:span><text:span text:style-name="T2">(64/9) </text:span> ⲛⲁⲛ ⲙ̅ⲡⲛⲟⲩⲥ ⲙ̅ⲡⲗⲟⲅⲟⲥ ⲛ̅‐ <text:line-break/><text:span text:style-name="T1"> </text:span><text:span text:style-name="T2">(64/10) </text:span> ⲧⲅⲛⲱⲥⲓⲥ· ⲡⲛⲟⲩⲥ ⲙⲉⲛ ϫⲉ‐ <text:line-break/><text:span text:style-name="T1"> </text:span><text:span text:style-name="T2">(64/11) </text:span> ⲕⲁⲁⲥ ⲉⲛⲁⲣ̅ⲛⲟⲉⲓ ⲙ̅ⲙⲟⲕ· ⲡⲗⲟ‐ <text:line-break/><text:span text:style-name="T1"> </text:span><text:span text:style-name="T2">(64/12) </text:span> ⲅⲟⲥ ⲇⲉ ϫⲉⲕⲁⲁⲥ ⲉⲛⲁϩⲉⲣⲙⲏ‐ <text:line-break/><text:span text:style-name="T1"> </text:span><text:span text:style-name="T2">(64/13) </text:span> ⲛⲉⲩⲉ ⲙ̅ⲙⲟⲕ· ⲧⲅⲛⲱⲥⲓⲥ ⲇⲉ <text:line-break/><text:span text:style-name="T1"> </text:span><text:span text:style-name="T2">(64/14) </text:span> ϫⲉⲕⲁⲁⲥ ⲉⲛⲛⲁⲥⲟⲩⲱⲛⲕ̅· <text:line-break/><text:span text:style-name="T1"> </text:span><text:span text:style-name="T2">(64/15) </text:span> ⲧⲛ̅ⲣⲁϣⲉ ⲛ̅ⲧⲁⲣⲛ̅ϫⲓ ⲟⲩⲟⲉⲓⲛ <text:line-break/><text:span text:style-name="T1"> </text:span><text:span text:style-name="T2">(64/16) </text:span> ϩⲛ̅ ⲧⲉⲕⲅⲛⲱⲥⲓⲥ· ⲧⲛ̅ⲣⲁϣⲉ <text:line-break/><text:span text:style-name="T1"> </text:span><text:span text:style-name="T2">(64/17) </text:span> ϫⲉ ⲁⲕⲧⲥⲉⲃⲟⲛ ⲉⲣⲟⲕ· ⲧⲛ̅ⲣⲁ‐ <text:line-break/><text:span text:style-name="T1"> </text:span><text:span text:style-name="T2">(64/18) </text:span> ϣⲉ ϫⲉ ⲉⲛϩⲛ̅ ⲥⲱⲙⲁ ⲁⲕⲁⲁⲛ <text:line-break/><text:span text:style-name="T1"> </text:span><text:span text:style-name="T2">(64/19) </text:span> ⲛ̅ⲛⲟⲩⲧⲉ ϩⲛ̅ ⲧⲉⲕⲅⲛⲱⲥⲓⲥ· <text:line-break/><text:span text:style-name="T1"> </text:span><text:span text:style-name="T2">(64/20) </text:span> ⲡϣⲡ ϩ’ⲙ←ⲁⲧ’ ⲛ̅ⲡⲣⲱⲙⲉ ⲉⲧ’ⲡⲏϩ <text:line-break/><text:span text:style-name="T1"> </text:span><text:span text:style-name="T2">(64/21) </text:span> ϣⲁⲣⲟⲕ· ⲟⲩⲁ ⲡⲉ ϫⲉⲕⲁⲥ ⲁⲧⲣⲛ̅‐ <text:line-break/><text:span text:style-name="T1"> </text:span><text:span text:style-name="T2">(64/22) </text:span> ⲥⲟⲩⲱⲛⲕ̅· ⲁⲛⲥⲟⲩⲱⲛⲕ̅ <text:line-break/><text:span text:style-name="T1"> </text:span><text:span text:style-name="T2">(64/23) </text:span> ⲱ̓ ⲡⲟⲩⲟⲉⲓⲛ ⲛ̅ⲛⲟⲏⲧⲟⲛ· ⲱ̓ <text:line-break/><text:span text:style-name="T1"> </text:span><text:span text:style-name="T2">(64/24) </text:span> ⲡⲱⲛϩ̅ ⲙ̅ⲡⲱⲛϩ̅ ⲁⲛⲥⲟⲩⲱⲛⲕ̅ <text:line-break/><text:span text:style-name="T1"> </text:span><text:span text:style-name="T2">(64/25) </text:span> ⲱ ⲧⲙⲏⲧⲣⲁ ⲛ̅ϫⲟ ⲛⲓⲙ ⲁⲛⲥⲟⲩ‐ <text:line-break/><text:span text:style-name="T1"> </text:span><text:span text:style-name="T2">(64/26) </text:span> ⲱⲛⲉ ⲱ͂ ⲧⲙⲏⲧⲣⲁ ⲉⲧ’ϫⲡⲟ ϩⲛ̅ <text:line-break/><text:span text:style-name="T1"> </text:span><text:span text:style-name="T2">(64/27) </text:span> ⲧⲫⲩⲥⲓⲥ ⲙ̅ⲡⲓⲱⲧ’ ⲁⲛⲥⲟⲩⲱ‐ <text:line-break/><text:span text:style-name="T1"> </text:span><text:span text:style-name="T2">(64/28) </text:span> ⲛⲉ ⲱ͂ ⲡⲙⲟⲩⲛ ⲉⲃⲟⲗ ϣⲁ ⲉⲛⲉϩ <text:line-break/><text:span text:style-name="T1"> </text:span><text:span text:style-name="T2">(64/29) </text:span> ⲙ̅ⲡⲉⲓⲱⲧ’ ⲉⲧ’ϫⲡⲟ ⲧⲉⲓ̈ϩⲉ ⲁⲛ‐ <text:line-break/><text:span text:style-name="T1"> </text:span><text:span text:style-name="T2">(64/30) </text:span> ⲟⲩⲱϣⲧ̅’ ⲙ̅ⲡⲉⲕⲁⲅⲁⲑⲟⲛ· ⲟⲩ <text:line-break/><text:span text:style-name="T1"> </text:span><text:span text:style-name="T2">(64/31) </text:span> ⲟⲩⲱϣⲉ ⲟⲩⲱⲧ’ ⲡⲉⲧⲛ̅ⲣ̅ⲁⲓⲧⲉⲓ <text:line-break/><text:span text:style-name="T1"> </text:span><text:span text:style-name="T2">(64/32) </text:span> ⲙ̅ⲙⲟϥ· ⲉⲛⲟⲩⲱϣ ⲉⲧⲣⲉⲩⲣ̅‐ <text:line-break/><text:span text:style-name="T1"> </text:span><text:span text:style-name="T2">(64/33) </text:span> ⲧⲏⲣⲉⲓ ⲙ̅ⲙⲟⲛ ϩⲛ̅ ⲧⲅⲛⲱⲥⲓⲥ· <text:line-break/><text:span text:style-name="T1"> </text:span><text:span text:style-name="T2">(64/34) </text:span> ⲟⲩⲁⲣⲉϩ ⲇⲉ ⲟⲩⲱⲧ’ ⲡⲉⲧⲉⲛ‐ <text:line-break/><text:span text:style-name="T1"> </text:span><text:span text:style-name="T2">(65/1) </text:span> ⲟⲩⲟϣϥ̅ ⲉⲧⲙ̅ⲧⲣⲉⲛⲥⲗⲁⲁⲧⲉ <text:line-break/><text:span text:style-name="T1"> </text:span><text:span text:style-name="T2">(65/2) </text:span> ϩⲙ̅ ⲡⲉⲉⲓⲃⲓⲟⲥ ⲛ̅ϯ[ⲙ]ⲓⲛⲉ· ⲛ̅‐ <text:line-break/><text:span text:style-name="T1"> </text:span><text:span text:style-name="T2">(65/3) </text:span> ⲧⲁⲣⲟⲩϫⲉ ⲛⲁⲓ̈ ⲉⲩϣⲗⲏⲗ̓ ⲁⲩⲣ̅‐ <text:line-break/><text:span text:style-name="T1"> </text:span><text:span text:style-name="T2">(65/4) </text:span> ⲁⲥⲡⲁⲍⲉ ⲛ̅ⲛⲉⲩⲉⲣⲏⲟⲩ· ⲁⲩⲱ <text:line-break/><text:span text:style-name="T1"> </text:span><text:span text:style-name="T2">(65/5) </text:span> ⲁⲩⲃⲱⲕ ⲉⲩⲛⲁⲟⲩⲱⲙ ⲛ̅ⲧⲉⲩ‐ <text:line-break/><text:span text:style-name="T1"> </text:span><text:span text:style-name="T2">(65/6) </text:span> ⲧⲣⲟⲫⲏ ⲉⲥⲟⲩⲁⲁⲃ· ⲉⲙⲛ̅ ⲥⲛⲟϥ <text:line-break/><text:span text:style-name="T1"> </text:span><text:span text:style-name="T2">(65/7) </text:span> ⲛ̅ϩⲏⲧⲥ̅· <text:line-break/><text:span text:style-name="T1"> </text:span><text:span text:style-name="T2">(65/8) </text:span> ⲡⲓⲟⲩⲁ ⲙⲉⲛ ⲗⲟⲅⲟⲥ ⲛ̅ⲧⲁⲉⲓⲥⲁϩϥ̅ ⲛ̅ⲧⲁϥ <text:line-break/><text:span text:style-name="T1"> </text:span><text:span text:style-name="T2">(65/9) </text:span> ⲁϩⲁϩ ⲅⲁⲣ ⲧⲟⲛⲱ ⲛ̅ⲧⲁϥ{ⲉ̅ⲓ} ⲉⲧⲟⲟⲧ’ ⲙ̅ⲡⲓ‐ <text:line-break/><text:soft-page-break/><text:span text:style-name="T1"> </text:span><text:span text:style-name="T2">(65/10) </text:span> ⲥⲁϩⲟⲩ ⲉⲓ̈ⲙⲉⲉⲩⲉ ϫⲉ ⲁⲩⲉⲓ ⲉⲧⲛ̅ⲧⲏⲛⲉ <text:line-break/><text:span text:style-name="T1"> </text:span><text:span text:style-name="T2">(65/11) </text:span> ⲕⲁⲓ ⲅⲁⲣ ϯⲇⲓⲥⲧⲁⲍⲉ ⲉⲓ̈ⲥϩⲁⲓ̈ ⲛ̅ⲛⲁⲓ̈ ⲛⲏ‐ <text:line-break/><text:span text:style-name="T1"> </text:span><text:span text:style-name="T2">(65/12) </text:span> ⲧⲛ̅ ϫⲉ ⲙⲉϣⲁⲕ ⲁⲩⲉⲓ ⲉⲧⲛ̅ⲧⲏⲛⲉ ⲛ̅ⲧⲉ‐ <text:line-break/><text:span text:style-name="T1"> </text:span><text:span text:style-name="T2">(65/13) </text:span> ⲡϩⲱⲃ ⲣ̅ {ϩ̅ⲓ}ⲥⲉ ⲛⲏⲧⲛ̅· ⲉⲡⲓ ⲛⲁϣⲱⲟⲩ <text:line-break/><text:span text:style-name="T1"> </text:span><text:span text:style-name="T2">(65/14) </text:span> ⲅⲁⲣ ⲛ̅ϭⲓ ⲛ̅ⲗⲟⲅⲟⲥ ⲉⲧⲁⲩⲉⲓ ⲉⲧⲟⲟⲧ’ ⲛ̅ⲧⲉ ⲡⲏ̣ </text:p>
      <text:p text:style-name="P1"/>
      <text:p text:style-name="P3">( codex VI ) Asclepius 21-29</text:p>
      <text:p text:style-name="P2"><text:span text:style-name="T1"> </text:span><text:span text:style-name="T2">(65/15) </text:span> ⲉϣϫⲉ ⲕⲟⲩⲱϣ ⲇⲉ ⲉⲛⲁⲩ ⲉⲫⲱⲃ ⲙ̅‐ <text:line-break/><text:span text:style-name="T1"> </text:span><text:span text:style-name="T2">(65/16) </text:span> ⲡⲉⲓ̈ⲙⲩⲥⲧⲏⲣⲓⲟⲛ· ⲁⲩⲱ ⲑⲓⲕⲱⲛ <text:line-break/><text:span text:style-name="T1"> </text:span><text:span text:style-name="T2">(65/17) </text:span> ⲛ̅ϣⲡⲏⲣⲉ ⲛ̅ⲅ’ⲛⲁⲩ ⲉⲣⲟⲥ ⲛ̅ⲧⲉ ⲧⲥⲩⲛ‐ <text:line-break/><text:span text:style-name="T1"> </text:span><text:span text:style-name="T2">(65/18) </text:span> ⲟⲩⲥⲓⲁ ⲉϣⲁⲥϣⲱⲡⲉ ⲉⲃⲟⲗ {ϩ̅ⲓ}ⲧⲙ̅ <text:line-break/><text:span text:style-name="T1"> </text:span><text:span text:style-name="T2">(65/19) </text:span> ⲫⲟⲟⲩⲧ’ ⲙⲛ̅ ⲧⲥ{ϩ̅ⲓ}ⲙⲉ· ϩⲟⲧⲁⲛ ϭⲉ <text:line-break/><text:span text:style-name="T1"> </text:span><text:span text:style-name="T2">(65/20) </text:span> ⲉϥϣⲁⲛ{ⲉ̅ⲓ} ⲉⲧⲁⲕⲙⲏ ϣⲁϥϥⲱϭⲉ ⲉⲃⲟⲗ <text:line-break/><text:span text:style-name="T1"> </text:span><text:span text:style-name="T2">(65/21) </text:span> ⲛ̅ϭⲓ ⲡⲉⲥⲡⲉⲣⲙⲁ· ⲛ̅ⲧⲉⲩⲛⲟⲩ ⲉⲧⲙ̅‐ <text:line-break/><text:span text:style-name="T1"> </text:span><text:span text:style-name="T2">(65/22) </text:span> ⲙⲁⲩ ϣⲁⲣⲉⲧⲥ{ϩ̅ⲓ}ⲙⲉ ϫⲓ ⲛ̅ⲧ’ϭⲟⲙ <text:line-break/><text:span text:style-name="T1"> </text:span><text:span text:style-name="T2">(65/23) </text:span> ⲙ̅ⲫⲟⲟⲩⲧ’· ⲫⲟⲟⲩⲧ’ ϩⲱⲱϥ ϣⲁϥ‐ <text:line-break/><text:span text:style-name="T1"> </text:span><text:span text:style-name="T2">(65/24) </text:span> ϫⲓ ⲛ̅ⲧϭⲟⲙ ⲛ̅ⲧ’ⲥ{ϩ̅ⲓ}ⲙⲉ ⲉⲣⲟϥ· ϩⲱⲥ <text:line-break/><text:span text:style-name="T1"> </text:span><text:span text:style-name="T2">(65/25) </text:span> ⲉⲣⲉⲡⲥⲡⲉⲣⲙⲁ ⲣ̅ⲉⲛⲉⲣⲅⲉⲓ ⲙ̅ⲡⲁⲓ̈· <text:line-break/><text:span text:style-name="T1"> </text:span><text:span text:style-name="T2">(65/26) </text:span> ⲉⲧⲃⲉ ⲡⲁⲓ̈ ⲡⲙⲩⲥⲧⲏⲣⲓⲟⲛ ⲛ̅ⲧⲥⲩ‐ <text:line-break/><text:span text:style-name="T1"> </text:span><text:span text:style-name="T2">(65/27) </text:span> ⲛⲟⲩⲥⲓⲁ ⲉⲩⲉⲓⲣⲉ ⲙ̅ⲙⲟϥ ϩⲛ̅ ⲟⲩϩⲱⲡ’ <text:line-break/><text:span text:style-name="T1"> </text:span><text:span text:style-name="T2">(65/28) </text:span> ϫⲉⲕⲁⲁⲥ ⲉⲛⲉⲧⲥⲟⲉⲓϣ ⲙ̅ⲫⲩⲥⲓⲥ <text:line-break/><text:span text:style-name="T1"> </text:span><text:span text:style-name="T2">(65/29) </text:span> ⲣ̅ⲁⲥⲭⲏⲙⲟⲛⲓ ⲛ̅ⲛⲁϩⲣⲛ̅ ϩⲁϩ ⲉⲩϫⲟ‐ <text:line-break/><text:span text:style-name="T1"> </text:span><text:span text:style-name="T2">(65/30) </text:span> ⲛⲧ̅’ ⲁⲛ ⲙ̅ⲫⲱⲃ ⲉⲧⲙ̅ⲙⲁⲩ· ⲡⲟⲩⲁ <text:line-break/><text:span text:style-name="T1"> </text:span><text:span text:style-name="T2">(65/31) </text:span> ⲅⲁⲣ ⲡⲟⲩⲁ ⲙ̅ⲙⲟⲟⲩ ϥ̅ϯ ⲙ̅ⲡⲉϥϫⲡⲟ· <text:line-break/><text:span text:style-name="T1"> </text:span><text:span text:style-name="T2">(65/32) </text:span> ⲛⲉⲧⲉ ⲅⲁⲣ ⲛ̅ⲛⲁⲧ’ⲥⲟⲟⲩⲛ ⲙ̅ⲡⲓϩⲱⲃ <text:line-break/><text:span text:style-name="T1"> </text:span><text:span text:style-name="T2">(65/33) </text:span> ⲉϣϫⲉ ϥϣⲟⲟⲡ’ ⲛ̅ⲛⲁϩⲣⲁⲩ ⲛ̅ⲥⲱⲃⲉ <text:line-break/><text:span text:style-name="T1"> </text:span><text:span text:style-name="T2">(65/34) </text:span> ⲁⲩⲱ ⲛ̅ⲛⲁⲧⲛⲁϩⲧⲉ· ⲛ̅ϩⲟⲩⲟ ⲇⲉ <text:line-break/><text:span text:style-name="T1"> </text:span><text:span text:style-name="T2">(65/35) </text:span> ϩⲉⲛⲙⲩⲥⲧⲏⲣⲓⲟⲛ ⲉⲩⲟⲩⲁⲁⲃ ⲛⲉ <text:line-break/><text:span text:style-name="T1"> </text:span><text:span text:style-name="T2">(65/36) </text:span> ⲛ̅ⲧⲉ ⲛ̅ⲗⲟⲅⲟⲥ ⲙⲛ̅ ⲛ̅ϩⲃⲏⲩⲉ· <text:line-break/><text:span text:style-name="T1"> </text:span><text:span text:style-name="T2">(65/37) </text:span> ⲟⲩ ⲙⲟⲛⲟⲛ ϫⲉ ⲉⲩⲧⲙ̅ⲥⲱⲧⲙ̅ <text:line-break/><text:span text:style-name="T1"> </text:span><text:span text:style-name="T2">(65/38) </text:span> ⲁⲗⲗⲁ ⲛ̅ⲥⲉⲛⲁⲩ· ⲉⲧⲃⲉ ⲡⲁⲓ̈ <text:line-break/><text:span text:style-name="T1"> </text:span><text:span text:style-name="T2">(66/1) </text:span> ⲛⲁⲓ̈ ⲛ̅ϯⲙⲓⲛⲉ ϩⲉⲛⲣⲉϥϫⲉ ⲟⲩⲁ ⲛⲉ <text:line-break/><text:span text:style-name="T1"> </text:span><text:span text:style-name="T2">(66/2) </text:span> ϩⲉⲛⲁⲧ’ⲛⲟⲩⲧⲉ ⲛⲉ ϩⲉⲛⲁⲥⲉⲃⲏⲥ ⲛⲉ <text:line-break/><text:span text:style-name="T1"> </text:span><text:span text:style-name="T2">(66/3) </text:span> ⲛⲁⲓ̈ ⲇⲉ ⲛ̅ϯⲙⲓⲛⲉ ⲛ̅ϩⲁϩ ⲉⲛ ⲛⲉ· <text:line-break/><text:span text:style-name="T1"> </text:span><text:span text:style-name="T2">(66/4) </text:span> ⲁⲗⲗⲁ ϩⲉⲛⲕⲟⲩⲉⲓ ⲛⲉ ⲉⲩⲏⲡ’ ⲛ̅‐ <text:line-break/><text:span text:style-name="T1"> </text:span><text:span text:style-name="T2">(66/5) </text:span> ϭⲓ ⲛ̅ⲣⲙ̅ⲛ̅ⲛⲟⲩⲧⲉ· ⲉⲧⲃⲉ ⲡⲁⲓ̈ <text:line-break/><text:span text:style-name="T1"> </text:span><text:span text:style-name="T2">(66/6) </text:span> ϣⲁⲣⲉⲧⲕⲁⲕⲓⲁ ϣⲱⲡⲉ ϩⲛ̅ ϩⲁϩ· <text:line-break/><text:span text:style-name="T1"> </text:span><text:span text:style-name="T2">(66/7) </text:span> ⲉϣⲱⲡⲉ ⲧⲉⲡⲓⲥⲧⲏⲙⲏ ϣⲟⲟⲡ’ <text:line-break/><text:span text:style-name="T1"> </text:span><text:span text:style-name="T2">(66/8) </text:span> ⲛⲁⲩ ⲁⲛ ⲉⲧⲃⲉ ⲛⲉⲧ’ⲥⲙⲟⲛⲧ̅’· <text:line-break/><text:span text:style-name="T1"> </text:span><text:span text:style-name="T2">(66/9) </text:span> ⲧⲅⲛⲱⲥⲓⲥ ⲅⲁⲣ ⲛ̅ⲛⲉⲧ’ⲥⲙⲟⲛⲧ̅’ <text:line-break/><text:span text:style-name="T1"> </text:span><text:span text:style-name="T2">(66/10) </text:span> ⲛⲁⲙⲉ ⲛ̅ⲧⲟⲥ ⲡⲉ ⲡⲧⲗ̅ϭⲟ ⲛ̅ⲙ̅ⲡⲁ‐ <text:line-break/><text:span text:style-name="T1"> </text:span><text:span text:style-name="T2">(66/11) </text:span> ⲑⲟⲥ ⲛ̅ⲑⲩⲗⲏ· ⲉⲧⲃⲉ ⲡⲁⲓ̈ ⲧⲉ‐ <text:line-break/><text:span text:style-name="T1"> </text:span><text:span text:style-name="T2">(66/12) </text:span> ⲡⲓⲥⲧⲏⲙⲏ ⲟⲩⲉⲃⲟⲗ ϩⲛ̅ ⲧⲅⲛⲱ‐ <text:line-break/><text:span text:style-name="T1"> </text:span><text:span text:style-name="T2">(66/13) </text:span> ⲥⲓⲥ ⲧⲉ· ⲉϣⲱⲡⲉ ⲇⲉ ⲟⲩⲛ̅ ⲟⲩ‐ <text:line-break/><text:span text:style-name="T1"> </text:span><text:span text:style-name="T2">(66/14) </text:span> ⲙⲛ̅ⲧ’ⲁⲧ’ⲥⲟⲟⲩⲛ ⲙⲛ̅ ⲟⲩⲉⲡⲓⲥⲧⲏ‐ <text:line-break/><text:span text:style-name="T1"> </text:span><text:span text:style-name="T2">(66/15) </text:span> ⲙⲏ ϣⲟⲟⲡ’ ⲁⲛ ϩⲛ̅ ⲧⲯⲩⲭⲏ ⲙ̅ⲡⲣⲱ‐ <text:line-break/><text:span text:style-name="T1"> </text:span><text:span text:style-name="T2">(66/16) </text:span> ⲙⲉ· ϣⲁⲣⲉⲙ̅ⲡⲁⲑⲟⲥ ϭⲱ ⲛ̅ϩⲏ‐ <text:line-break/><text:span text:style-name="T1"> </text:span><text:span text:style-name="T2">(66/17) </text:span> ⲧⲥ̅ ⲉⲙⲛ̅ⲧⲉⲩ ⲧⲁⲗϭⲟ· ⲛ̅ⲧⲉⲧⲕⲉ‐ <text:line-break/><text:span text:style-name="T1"> </text:span><text:span text:style-name="T2">(66/18) </text:span> ⲕⲁⲕⲓⲁ ϣⲱⲡⲉ ⲛⲙ̅ⲙⲁⲩ ⲙ̅ⲡ’‐ <text:line-break/><text:span text:style-name="T1"> </text:span><text:span text:style-name="T2">(66/19) </text:span> ⲥⲙⲟⲧ’ ⲛ̅ⲟⲩⲥⲁϣ ⲉⲙⲛ̅ⲧⲉϥ ⲧⲁⲗϭⲟ· <text:line-break/><text:span text:style-name="T1"> </text:span><text:span text:style-name="T2">(66/20) </text:span> ⲡⲥⲁϣ ⲇⲉ ϣⲁϥⲟⲩⲱⲙ ⲛ̅ⲥⲁ ⲧⲯⲩ‐ <text:line-break/><text:span text:style-name="T1"> </text:span><text:span text:style-name="T2">(66/21) </text:span> ⲭⲏ ⲛ̅ⲥⲣ̅ ϥⲛ̅ⲧ’ ⲉⲃⲟⲗ {ϩ̅ⲓ}ⲧⲟⲟⲧϥ̅ ⲛ̅‐ <text:line-break/><text:span text:style-name="T1"> </text:span><text:span text:style-name="T2">(66/22) </text:span> ⲧⲕⲁⲕⲓⲁ ⲛ̅ⲥⲣ̅ ⲥ̅ϯⲃⲱⲱⲛ· ⲡⲛⲟⲩ‐ <text:line-break/><text:span text:style-name="T1"> </text:span><text:span text:style-name="T2">(66/23) </text:span> ⲧⲉ ⲇⲉ ϥϣⲟⲟⲡ’ ⲛ̅ⲁⲛⲁⲓⲧⲓⲟⲥ ⲛ̅‐ <text:line-break/><text:soft-page-break/><text:span text:style-name="T1"> </text:span><text:span text:style-name="T2">(66/24) </text:span> ⲛⲁⲓ̈ ϩⲱⲥ ⲉⲁϥⲧⲛ̅ⲛⲟⲟⲩ ⲛ̅ⲛ̅ⲣⲱ‐ <text:line-break/><text:span text:style-name="T1"> </text:span><text:span text:style-name="T2">(66/25) </text:span> ⲙⲉ ⲛ̅ⲧⲅⲛⲱⲥⲓⲥ ⲙⲛ̅ ⲧⲉⲡⲓⲥⲧⲏ‐ <text:line-break/><text:span text:style-name="T1"> </text:span><text:span text:style-name="T2">(66/26) </text:span> ⲙⲏ· ⲱ͂ ⲡⲧⲣⲓⲥⲙⲉⲅⲓⲥⲧⲟⲥ ⲛ̅‐ <text:line-break/><text:span text:style-name="T1"> </text:span><text:span text:style-name="T2">(66/27) </text:span> ⲧⲁϥⲧⲛ̅ⲛⲟⲟⲩⲥⲉ ⲛ̅ⲛ̅ⲣⲱⲙⲉ <text:line-break/><text:span text:style-name="T1"> </text:span><text:span text:style-name="T2">(66/28) </text:span> ⲟⲩⲁⲁⲩ· ⲉϩⲉ ⲱ͂ ⲁⲥⲕⲗⲏⲡⲓⲉ ⲛ̅‐ <text:line-break/><text:span text:style-name="T1"> </text:span><text:span text:style-name="T2">(66/29) </text:span> ⲧⲁϥⲧⲛ̅ⲛⲟⲟⲩⲥⲉ ⲛⲁⲩ ⲟⲩⲁⲁⲩ <text:line-break/><text:span text:style-name="T1"> </text:span><text:span text:style-name="T2">(66/30) </text:span> ⲟⲩⲁⲝⲓⲟⲛ ⲇⲉ ⲡⲉ ⲉⲧⲣⲉⲛϫⲟ‐ <text:line-break/><text:span text:style-name="T1"> </text:span><text:span text:style-name="T2">(66/31) </text:span> ⲟⲥ ⲉⲣⲟⲕ· ⲉⲧⲃⲉ ⲟⲩ ⲛ̅ⲣⲱⲙⲉ <text:line-break/><text:span text:style-name="T1"> </text:span><text:span text:style-name="T2">(66/32) </text:span> ⲟⲩⲁⲁⲩ ⲁϥⲣ̅ⲭⲁⲣⲓⲍⲉ ⲛⲁⲩ ⲛ̅ⲧ’‐ <text:line-break/><text:span text:style-name="T1"> </text:span><text:span text:style-name="T2">(66/33) </text:span> ⲅⲛⲱⲥⲓⲥ ⲙⲛ̅ ⲧⲉⲡⲓⲥⲧⲏⲙⲏ <text:line-break/><text:span text:style-name="T1"> </text:span><text:span text:style-name="T2">(66/34) </text:span> ⲡⲙⲉⲣⲟⲥ ⲙ̅ⲡⲉϥⲁⲅⲁⲑⲟⲛ· ϯ‐ <text:line-break/><text:span text:style-name="T1"> </text:span><text:span text:style-name="T2">(66/35) </text:span> ⲛⲟⲩ ⲇⲉ ⲥⲱⲧⲙ̅ ⲡⲛⲟⲩⲧⲉ ⲙⲛ̅ <text:line-break/><text:span text:style-name="T1"> </text:span><text:span text:style-name="T2">(66/36) </text:span> ⲡⲓⲱⲧ’ ⲁⲩⲱ ⲡϫⲟⲉⲓⲥ ⲁϥⲧⲁ‐ <text:line-break/><text:span text:style-name="T1"> </text:span><text:span text:style-name="T2">(66/37) </text:span> ⲙⲓⲉ ⲡⲣⲱⲙⲉ ⲙⲛ̅ⲛ̅ⲥⲁ ⲛ̅ⲛⲟⲩ‐ <text:line-break/><text:span text:style-name="T1"> </text:span><text:span text:style-name="T2">(66/38) </text:span> ⲧⲉ· ⲁⲩⲱ ⲁϥϫⲓ ⲙ̅ⲙⲟϥ ⲉⲃⲟⲗ <text:line-break/><text:span text:style-name="T1"> </text:span><text:span text:style-name="T2">(67/1) </text:span> ϩⲛ̅ ⲧⲙⲉⲣⲓⲥ ⲛ̅ⲑⲩⲗⲏ [·ⲉⲡⲓ ⲑ]ⲩⲗ[ⲏ] <text:line-break/><text:span text:style-name="T1"> </text:span><text:span text:style-name="T2">(67/2) </text:span> ⲉϩ̣ⲟⲩⲛ ⲉⲡⲧⲁⲙⲓⲟ ⲙ̅[ⲡⲣⲱ]ⲙ̣ⲉ <text:line-break/><text:span text:style-name="T1"> </text:span><text:span text:style-name="T2">(67/3) </text:span> ⲙ̅ⲡ̣[..].ⲛ̣ⲉ· ϣⲁⲣⲉⲙ̣̅ⲡ̣[ⲁⲑⲟ]ⲥ ϣⲱ‐ <text:line-break/><text:span text:style-name="T1"> </text:span><text:span text:style-name="T2">(67/4) </text:span> ⲡⲉ ϩⲣⲁⲓ̈ ⲛ̅ϩⲏⲧⲥ̅· ⲉⲃⲟⲗ ϩⲙ̅ ⲡⲁⲓ̈ <text:line-break/><text:span text:style-name="T1"> </text:span><text:span text:style-name="T2">(67/5) </text:span> ϣⲁⲣⲟⲩϩⲉϯⲉ ⲉϩⲣⲁⲓ̈ ⲉϫⲙ̅ ⲡⲉϥ‐ <text:line-break/><text:span text:style-name="T1"> </text:span><text:span text:style-name="T2">(67/6) </text:span> ⲥⲱⲙⲁ· ⲛⲉϥⲛⲁϣⲱⲡⲉ ⲅⲁⲣ ⲁⲛ <text:line-break/><text:span text:style-name="T1"> </text:span><text:span text:style-name="T2">(67/7) </text:span> ⲛ̅ⲕⲉⲣⲏⲧⲉ ⲉⲓ ⲙⲏⲧⲓ ϫⲉ ϥϫⲓ ⲛ̅ⲧⲉⲓ̈‐ <text:line-break/><text:span text:style-name="T1"> </text:span><text:span text:style-name="T2">(67/8) </text:span> ⲧⲣⲟⲫⲏ ⲛ̅ϭⲓ ⲡⲉⲓ̈ⲍⲱⲟⲛ ϩⲱⲥ <text:line-break/><text:span text:style-name="T1"> </text:span><text:span text:style-name="T2">(67/9) </text:span> ⲉⲩⲣⲉϥⲙⲟⲩ ⲡⲉ· ⲧⲁⲛⲁⲅ’ⲕⲏ <text:line-break/><text:span text:style-name="T1"> </text:span><text:span text:style-name="T2">(67/10) </text:span> ⲧⲉ ⲉⲧⲣⲉϩⲉⲛⲕⲉⲉⲡⲓⲑⲩⲙⲓⲁ <text:line-break/><text:span text:style-name="T1"> </text:span><text:span text:style-name="T2">(67/11) </text:span> ϣⲱⲡⲉ ⲛⲁϥ ⲛ̅ⲛⲁⲧⲟⲩⲟⲉⲓϣ ⲉⲩ‐ <text:line-break/><text:span text:style-name="T1"> </text:span><text:span text:style-name="T2">(67/12) </text:span> ⲣ̅ⲃⲗⲁⲡⲧⲉⲓ· ⲛ̅ⲛⲟⲩⲧⲉ ⲅⲁⲣ ϩⲱⲥ <text:line-break/><text:span text:style-name="T1"> </text:span><text:span text:style-name="T2">(67/13) </text:span> ⲉⲁⲩϣⲱⲡⲉ ⲉⲃⲟⲗ ϩⲛ̅ ⲟⲩϩⲩⲗⲏ <text:line-break/><text:span text:style-name="T1"> </text:span><text:span text:style-name="T2">(67/14) </text:span> ⲉⲥⲟⲩⲁⲁⲃ· ⲥⲉⲣ̅ⲭⲣⲓⲁ ⲅⲁⲣ ⲁⲛ ⲛ̅ⲟⲩ‐ <text:line-break/><text:span text:style-name="T1"> </text:span><text:span text:style-name="T2">(67/15) </text:span> ⲉⲡⲓⲥⲧⲏⲙⲏ ⲙⲛ̅ ⲟⲩⲅⲛⲱⲥⲓⲥ <text:line-break/><text:span text:style-name="T1"> </text:span><text:span text:style-name="T2">(67/16) </text:span> ⲧⲙⲛ̅ⲧ’ⲁⲧ’ⲙⲟⲩ ⲅⲁⲣ ⲛ̅ⲛ̅ⲛⲟⲩⲧⲉ <text:line-break/><text:span text:style-name="T1"> </text:span><text:span text:style-name="T2">(67/17) </text:span> ⲧⲉ ⲧⲉⲡⲓⲥⲧⲏⲙⲏ ⲙⲛ̅ ⲧⲅⲛⲱⲥⲓⲥ <text:line-break/><text:span text:style-name="T1"> </text:span><text:span text:style-name="T2">(67/18) </text:span> ϩⲱⲥ ⲁⲩϣⲱⲡⲉ ⲉⲃⲟⲗ ϩⲛ̅ ⲑⲩ‐ <text:line-break/><text:span text:style-name="T1"> </text:span><text:span text:style-name="T2">(67/19) </text:span> ⲗⲏ ⲉⲧⲟⲩⲁⲁⲃ· ⲁⲥϣⲱⲡⲉ ⲛⲁⲩ <text:line-break/><text:span text:style-name="T1"> </text:span><text:span text:style-name="T2">(67/20) </text:span> ⲛ̅ⲧⲁⲝⲓⲥ ⲛ̅ⲧⲅⲛⲱⲥⲓⲥ ⲙⲛ̅ ⲧⲉⲡⲓⲥ‐ <text:line-break/><text:span text:style-name="T1"> </text:span><text:span text:style-name="T2">(67/21) </text:span> ⲧⲏⲙⲏ· ⲕⲁⲧⲁ ⲟⲩⲁⲛⲁⲅ’ⲕⲏ ⲁϥ‐ <text:line-break/><text:span text:style-name="T1"> </text:span><text:span text:style-name="T2">(67/22) </text:span> ⲣ̅ϩⲟⲣⲓⲍⲉ ⲙ̅ⲡⲣⲱⲙⲉ ⲁϥⲕⲁⲁϥ <text:line-break/><text:span text:style-name="T1"> </text:span><text:span text:style-name="T2">(67/23) </text:span> ϩⲛ̅ ⲟⲩⲉⲡⲓⲥⲧⲏⲙⲏ ⲙⲛ̅ ⲟⲩⲅⲛⲱ‐ <text:line-break/><text:span text:style-name="T1"> </text:span><text:span text:style-name="T2">(67/24) </text:span> ⲥⲓⲥ· ⲉⲧⲃⲉ ⲛⲉⲛⲧⲁⲛϫⲟⲟⲩ <text:line-break/><text:span text:style-name="T1"> </text:span><text:span text:style-name="T2">(67/25) </text:span> ϫⲓⲛ ⲛ̅ϣⲟⲣⲡ̅’ ⲁϥϫⲟⲕⲟⲩ ⲉⲃⲟⲗ· <text:line-break/><text:span text:style-name="T1"> </text:span><text:span text:style-name="T2">(67/26) </text:span> ϫⲉⲕⲁⲁⲥ ⲉⲃⲟⲗ {ϩ̅ⲓ}ⲧⲛ̅ ⲛⲁⲓ̈ ⲙ̅ⲡⲁ‐ <text:line-break/><text:span text:style-name="T1"> </text:span><text:span text:style-name="T2">(67/27) </text:span> ⲑⲟⲥ ⲙⲛ̅ ⲛ̅ⲕⲁϭⲓⲁ ⲛ̅ϥϣⲱⲡ’ ⲉⲣⲟ‐ <text:line-break/><text:span text:style-name="T1"> </text:span><text:span text:style-name="T2">(67/28) </text:span> ⲟⲩ ⲙ̅ⲙⲁⲩ ⲕⲁⲧⲁ ⲡⲉϥⲟⲩⲱϣ· <text:line-break/><text:span text:style-name="T1"> </text:span><text:span text:style-name="T2">(67/29) </text:span> ⲡⲉϥⲑⲛⲏⲧⲟⲛ ⲁϥⲛ̅ⲧϥ̅ ⲉϩⲟⲩⲛ <text:line-break/><text:span text:style-name="T1"> </text:span><text:span text:style-name="T2">(67/30) </text:span> ⲉⲩⲙⲛ̅ⲧ’ⲁⲧⲙⲟⲩ· ⲛ̅ⲧⲁϥ{ⲁ}ϣⲱⲡⲉ <text:line-break/><text:span text:style-name="T1"> </text:span><text:span text:style-name="T2">(67/31) </text:span> ⲛ̅ⲁⲅⲁⲑⲟⲥ ⲛ̅ⲛⲁⲧⲙⲟⲩ ⲛ̅ⲑⲉ ⲛ̅‐ <text:line-break/><text:span text:style-name="T1"> </text:span><text:span text:style-name="T2">(67/32) </text:span> ⲧⲁⲉⲓϫⲟⲟⲥ· ⲁϥⲧⲁⲙⲓⲉ ⲫⲩⲥⲓⲥ <text:line-break/><text:soft-page-break/><text:span text:style-name="T1"> </text:span><text:span text:style-name="T2">(67/33) </text:span> ⲥⲛ̅ⲧⲉ ⲅⲁⲣ ⲛⲁϥ· ⲧⲁⲧ’ⲙⲟⲩ ⲁⲩⲱ <text:line-break/><text:span text:style-name="T1"> </text:span><text:span text:style-name="T2">(67/34) </text:span> ⲧⲉⲧⲉϣⲁⲥⲙⲟⲩ· ⲁⲩⲱ ⲁⲥ‐ <text:line-break/><text:span text:style-name="T1"> </text:span><text:span text:style-name="T2">(67/35) </text:span> ϣⲱⲡⲉ ⲛ̅ϯϩⲉ ⲉⲧⲃⲉ ⲡⲟⲩⲱϣⲉ <text:line-break/><text:span text:style-name="T1"> </text:span><text:span text:style-name="T2">(68/1) </text:span> ⲙ̅[ⲡⲛⲟⲩⲧ]ⲉ ⲉⲧⲣⲉⲡⲣⲱⲙⲉ ϣⲱ̣‐ <text:line-break/><text:span text:style-name="T1"> </text:span><text:span text:style-name="T2">(68/2) </text:span> ⲡ[ⲉ ⲉϥⲥ]ⲁ̣ⲧⲡ̅’ ⲁⲛⲛⲟⲩⲧⲉ· ϩⲱⲥ <text:line-break/><text:span text:style-name="T1"> </text:span><text:span text:style-name="T2">(68/3) </text:span> ⲉ̣[ⲓⲥ ⲛ̅ⲛⲟ]ⲩⲧⲉ ⲙⲉⲛ ⲉⲩ̣[ϣⲟ]ⲟⲡ’ <text:line-break/><text:span text:style-name="T1"> </text:span><text:span text:style-name="T2">(68/4) </text:span> ⲛ̅ⲛ[ⲁ]ⲧ’̣ⲙⲟⲩ· ⲛ̅ⲣⲱⲙⲉ ⲇⲉ ϩⲱ‐ <text:line-break/><text:span text:style-name="T1"> </text:span><text:span text:style-name="T2">(68/5) </text:span> ⲟⲩ ⲥⲉⲉ ⲛ̅ⲁⲧⲙⲟⲩ ⲁⲩⲱ ⲛ̅ⲣⲉϥ‐ <text:line-break/><text:span text:style-name="T1"> </text:span><text:span text:style-name="T2">(68/6) </text:span> ⲙⲟⲩ· ⲉⲧⲃⲉ ⲡⲁⲓ̈ ⲁⲡⲣⲱⲙⲉ <text:line-break/><text:span text:style-name="T1"> </text:span><text:span text:style-name="T2">(68/7) </text:span> ϣⲱⲡⲉ ⲛ̅ⲥⲩⲅ’ⲅⲉⲛⲏⲥ ⲛ̅ⲛ̅ⲛⲟⲩ‐ <text:line-break/><text:span text:style-name="T1"> </text:span><text:span text:style-name="T2">(68/8) </text:span> ⲧⲉ· ⲥⲉⲥⲟⲟⲩⲛ ⲇⲉ ⲛ̅ⲛ̅ϩⲃⲏⲟⲩⲉ <text:line-break/><text:span text:style-name="T1"> </text:span><text:span text:style-name="T2">(68/9) </text:span> ⲛ̅ⲛⲉⲩⲉⲣⲏⲟⲩ ϩⲛ̅ ⲟⲩⲱⲣϫ̅· ⲛ̅‐ <text:line-break/><text:span text:style-name="T1"> </text:span><text:span text:style-name="T2">(68/10) </text:span> ⲛⲟⲩⲧⲉ ⲙⲉⲛ ⲉⲩⲥⲟⲟⲩⲛ ⲛ̅ⲛⲁ <text:line-break/><text:span text:style-name="T1"> </text:span><text:span text:style-name="T2">(68/11) </text:span> ⲛ̅ⲣⲱⲙⲉ· ⲁⲩⲱ ⲛ̅ⲣⲱⲙⲉ ⲥⲉ‐ <text:line-break/><text:span text:style-name="T1"> </text:span><text:span text:style-name="T2">(68/12) </text:span> ⲥⲟⲟⲩⲛ ⲛ̅ⲛⲁ ⲛ̅ⲛⲟⲩⲧⲉ· ⲉⲉⲓ‐ <text:line-break/><text:span text:style-name="T1"> </text:span><text:span text:style-name="T2">(68/13) </text:span> ϣⲁϫⲉ ⲇⲉ ⲁⲛⲣⲱⲙⲉ ⲱ ⲁⲥⲕⲗⲏ‐ <text:line-break/><text:span text:style-name="T1"> </text:span><text:span text:style-name="T2">(68/14) </text:span> ⲡⲓⲉ ⲛⲁⲓ̈ ⲛ̅ⲧⲁϩⲙⲉⲧⲉ ⲉⲧⲉⲡⲓⲥ‐ <text:line-break/><text:span text:style-name="T1"> </text:span><text:span text:style-name="T2">(68/15) </text:span> ⲧⲏⲙⲏ ⲙⲛ̅ ⲧⲅⲛⲱⲥⲓⲥ· ⲛⲉⲧ’‐ <text:line-break/><text:span text:style-name="T1"> </text:span><text:span text:style-name="T2">(68/16) </text:span> ϣⲟⲩⲉⲓⲧ’ ⲇⲉ ⲉⲛⲁⲓ̈ ⲛ̅ϣϣⲉ <text:line-break/><text:span text:style-name="T1"> </text:span><text:span text:style-name="T2">(68/17) </text:span> ⲁⲛ ⲉⲧⲣⲉⲛϫⲉ ⲗⲁⲁⲩ ⲙ̅ⲫⲁⲩⲗⲟⲛ <text:line-break/><text:span text:style-name="T1"> </text:span><text:span text:style-name="T2">(68/18) </text:span> ϩⲱⲥ ⲉⲛϣⲟⲟⲡ’ ⲛ̅ⲑⲉⲓⲟⲥ ⲉⲛ‐ <text:line-break/><text:span text:style-name="T1"> </text:span><text:span text:style-name="T2">(68/19) </text:span> ϫⲉⲓ ⲉϩⲟⲩⲛ ⲉϩⲉⲛϣⲁϫⲉ ⲉⲩ‐ <text:line-break/><text:span text:style-name="T1"> </text:span><text:span text:style-name="T2">(68/20) </text:span> ⲟⲩⲁⲁⲃ· ⲉⲡⲓⲇⲏ ⲁⲛ{ⲉ̅ⲓ} ⲉϩⲟⲩⲛ <text:line-break/><text:span text:style-name="T1"> </text:span><text:span text:style-name="T2">(68/21) </text:span> ⲉⲡϣⲁϫⲉ ⲛ̅ⲧⲕⲟⲓⲛⲱⲛⲓⲁ ⲛ̅ⲛ̅‐ <text:line-break/><text:span text:style-name="T1"> </text:span><text:span text:style-name="T2">(68/22) </text:span> ⲛⲟⲩⲧⲉ ⲙⲛ̅ ⲛ̅ⲣⲱⲙⲉ· ⲙ̅ⲙⲉ <text:line-break/><text:span text:style-name="T1"> </text:span><text:span text:style-name="T2">(68/23) </text:span> ⲱ͂ ⲁⲥⲕⲗⲏⲡⲓⲉ ⲡⲉⲧⲉⲣⲉⲡⲣⲱ‐ <text:line-break/><text:span text:style-name="T1"> </text:span><text:span text:style-name="T2">(68/24) </text:span> ⲙⲉ ⲛⲁϣϭⲙ̅ϭⲟⲙ ⲛ̅ϩⲏⲧϥ̅· ⲛ̅‐ <text:line-break/><text:span text:style-name="T1"> </text:span><text:span text:style-name="T2">(68/25) </text:span> ⲑⲉ ⲅⲁⲣ ⲙ̅ⲡⲓⲱⲧ’ ⲡϫⲟⲉⲓⲥ ⲙ̅‐ <text:line-break/><text:span text:style-name="T1"> </text:span><text:span text:style-name="T2">(68/26) </text:span> ⲡⲧⲏⲣϥ̅ ⲉϥⲧⲁⲙⲓⲉ ⲛⲟⲩⲧⲉ· <text:line-break/><text:span text:style-name="T1"> </text:span><text:span text:style-name="T2">(68/27) </text:span> ⲧⲁⲓ̈ ⲧⲉ ⲑⲉ ϩⲱⲱϥ ⲟⲛ ⲙ̅ⲡⲣⲱⲙⲉ <text:line-break/><text:span text:style-name="T1"> </text:span><text:span text:style-name="T2">(68/28) </text:span> ⲡⲉⲓ̈ⲍⲱⲟⲛ ⲉⲧ’{ϩ̅ⲓ}ϫⲙ̅ ⲡⲕⲁϩ ⲛ̅‐ <text:line-break/><text:span text:style-name="T1"> </text:span><text:span text:style-name="T2">(68/29) </text:span> ⲣⲉϥⲙⲟⲩ· ⲡⲁⲓ̈ ⲉⲧ’ⲧⲛ̅ⲧⲱⲛ ⲁⲛ <text:line-break/><text:span text:style-name="T1"> </text:span><text:span text:style-name="T2">(68/30) </text:span> ⲉⲡⲛⲟⲩⲧⲉ· ⲛ̅ⲧⲟϥ ϩⲱⲱϥ ⲟⲛ <text:line-break/><text:span text:style-name="T1"> </text:span><text:span text:style-name="T2">(68/31) </text:span> ϥⲧⲁⲙⲓⲉ ⲛⲟⲩⲧⲉ· ⲟⲩ ⲙⲟⲛⲟⲛ <text:line-break/><text:span text:style-name="T1"> </text:span><text:span text:style-name="T2">(68/32) </text:span> ϥⲧⲁϫⲣⲟ ⲁⲗⲗⲁ ⲥⲉⲧⲁϫⲣⲟ ⲙ̅ⲙⲟϥ <text:line-break/><text:span text:style-name="T1"> </text:span><text:span text:style-name="T2">(68/33) </text:span> ⲟⲩ ⲙⲟⲛⲟⲛ ϥⲣ̅ ⲛⲟⲩⲧⲉ ⲁⲗⲗⲁ <text:line-break/><text:span text:style-name="T1"> </text:span><text:span text:style-name="T2">(68/34) </text:span> ϥⲧⲁⲙⲓⲉ ⲛⲟⲩⲧⲉ· ⲕⲣ̅ⲑⲁⲩⲙⲁ‐ <text:line-break/><text:span text:style-name="T1"> </text:span><text:span text:style-name="T2">(68/35) </text:span> ⲍⲉ ⲱ͂ ⲁⲥⲕⲗⲏⲡⲓⲉ ⲛ̅ⲧⲟⲕ ϩⲱ‐ <text:line-break/><text:span text:style-name="T1"> </text:span><text:span text:style-name="T2">(68/36) </text:span> ⲱⲕ ⲕⲉ ⲛ̅ⲛⲁⲧⲛⲁϩⲧⲉ ⲛ̅ⲑⲉ ⲛ̅ϩⲁϩ· <text:line-break/><text:span text:style-name="T1"> </text:span><text:span text:style-name="T2">(69/1) </text:span> ⲱ ⲧⲣⲓⲥⲙ̣[ⲉⲅⲓⲥⲧⲉ ϯϥⲓ ⲙⲛ̅] ⲛ̣̅ϣ[ⲁ]‐ <text:line-break/><text:span text:style-name="T1"> </text:span><text:span text:style-name="T2">(69/2) </text:span> ϫⲉ̣ ⲉϫⲱ ϯⲡⲓⲥⲧⲉ̣[ⲩⲉ ⲙ]ⲉ̣ⲛ ⲛⲁⲕ̣ <text:line-break/><text:span text:style-name="T1"> </text:span><text:span text:style-name="T2">(69/3) </text:span> ⲉⲕ[ϣⲁ]ϫ̣ⲉ· ⲁⲩⲱ ⲁ[ⲉ]ⲓ̣ⲣ̣̅ ϣ̣ⲡ̣ⲏⲣⲉ <text:line-break/><text:span text:style-name="T1"> </text:span><text:span text:style-name="T2">(69/4) </text:span> ⲇⲉ ⲙ̅ⲡϣⲁϫⲉ ⲙ̅ⲡ[ⲁⲓ̈]· ⲁⲩⲱ ⲁⲉⲓ‐ <text:line-break/><text:span text:style-name="T1"> </text:span><text:span text:style-name="T2">(69/5) </text:span> ⲉⲡ’ ⲡⲣⲱⲙⲉ ϫⲉ ⲟ̣ⲩⲙⲁⲕⲁⲣⲓⲟⲥ <text:line-break/><text:span text:style-name="T1"> </text:span><text:span text:style-name="T2">(69/6) </text:span> ⲡⲉ· ⲉⲁϥⲙⲉⲧⲉ ⲉⲧ̣ⲉⲓ̈ⲛⲟϭ ⲛ̅ϭⲟⲙ <text:line-break/><text:span text:style-name="T1"> </text:span><text:span text:style-name="T2">(69/7) </text:span> ⲁⲩⲱ ⲡⲉⲧⲛⲉⲁϥ ⲉⲛⲁⲓ̈ ⲧⲏⲣⲟⲩ <text:line-break/><text:span text:style-name="T1"> </text:span><text:span text:style-name="T2">(69/8) </text:span> ⲱ͂ ⲁⲥⲕⲗⲏⲡⲓⲉ ϥⲙ̅ⲡϣⲁ ⲛ̅ⲣ̅ⲑⲁⲩ‐ <text:line-break/><text:soft-page-break/><text:span text:style-name="T1"> </text:span><text:span text:style-name="T2">(69/9) </text:span> ⲙⲁⲍⲉ ⲙ̅ⲙⲟϥ· ϥⲟⲩⲟⲛϩ̅ ⲙⲉⲛ ⲛⲁⲛ <text:line-break/><text:span text:style-name="T1"> </text:span><text:span text:style-name="T2">(69/10) </text:span> ⲉⲃⲟⲗ ⲉⲧⲃⲉ ⲡⲅⲉⲛⲟⲥ ⲛ̅ⲛ̅ⲛⲟⲩⲧⲉ <text:line-break/><text:span text:style-name="T1"> </text:span><text:span text:style-name="T2">(69/11) </text:span> ⲁⲩⲱ ⲧⲛ̅ⲣ̅ϩⲟⲙⲟⲗⲟⲅⲉⲓ ⲙ̅ⲙⲟϥ· <text:line-break/><text:span text:style-name="T1"> </text:span><text:span text:style-name="T2">(69/12) </text:span> ⲁⲩⲱ ⲟⲩⲟⲛ ⲛⲓⲙ ϫⲉ ⲛ̅ⲧⲁϥϣⲱⲡⲉ <text:line-break/><text:span text:style-name="T1"> </text:span><text:span text:style-name="T2">(69/13) </text:span> ⲉⲃⲟⲗ ϩⲛ̅ ⲟⲩϩⲩⲗⲏ ⲉⲥⲟⲩⲁⲁⲃ· ⲁⲩⲱ <text:line-break/><text:span text:style-name="T1"> </text:span><text:span text:style-name="T2">(69/14) </text:span> ⲛⲉⲩⲥⲱⲙⲁ ϩⲉⲛⲁⲡⲉ ⲙ̅ⲙⲉⲧⲉ· <text:line-break/><text:span text:style-name="T1"> </text:span><text:span text:style-name="T2">(69/15) </text:span> ⲡⲉⲧⲉ ⲛ̅ⲣⲱⲙⲉ ⲇⲉ ⲥⲱⲛⲧ̅’ ⲙ̅ⲙⲁϥ <text:line-break/><text:span text:style-name="T1"> </text:span><text:span text:style-name="T2">(69/16) </text:span> ⲡⲉ ⲡⲓⲛⲉ ⲛ̅ⲛ̅ⲛⲟⲩⲧⲉ· ϩⲉⲛⲉⲃⲟⲗ <text:line-break/><text:span text:style-name="T1"> </text:span><text:span text:style-name="T2">(69/17) </text:span> ⲛⲉ ϩⲙ̅ ⲫⲁⲉ ⲛ̅ⲙⲉⲣⲟⲥ ⲛ̅ⲧⲉ ⲑⲩⲗⲏ <text:line-break/><text:span text:style-name="T1"> </text:span><text:span text:style-name="T2">(69/18) </text:span> ⲁⲩⲱ ⲟⲩⲉⲃⲟⲗ ⲡⲉ ϩⲙ̅ ⲡϩⲁⲉ ⲛ̅ⲉⲓ‐ <text:line-break/><text:span text:style-name="T1"> </text:span><text:span text:style-name="T2">(69/19) </text:span> ⲛⲁⲓ ⲛ̅ⲧⲉ ⲛ̅ⲣⲱⲙⲉ· ⲟⲩ ⲙⲟⲛⲟⲛ <text:line-break/><text:span text:style-name="T1"> </text:span><text:span text:style-name="T2">(69/20) </text:span> ϩⲉⲛⲁⲡⲏⲩⲉ ⲛⲉ· ⲁⲗⲗⲁ ⲛ̅ⲕⲉⲙⲉⲣⲟⲥ <text:line-break/><text:span text:style-name="T1"> </text:span><text:span text:style-name="T2">(69/21) </text:span> ⲧⲏⲣⲟⲩ ⲛ̅ⲧⲉ ⲡⲥⲱⲙⲁ· ⲁⲩⲱ ⲕⲁ‐ <text:line-break/><text:span text:style-name="T1"> </text:span><text:span text:style-name="T2">(69/22) </text:span> ⲧⲁ ⲡⲟⲩⲉⲓⲛⲉ· ⲕⲁⲧⲁ ⲑⲉ ⲛ̅ⲧⲁ‐ <text:line-break/><text:span text:style-name="T1"> </text:span><text:span text:style-name="T2">(69/23) </text:span> ⲡⲛⲟⲩⲧⲉ ⲟⲩⲱϣⲉ ⲉⲧⲣⲉⲡⲣⲱ‐ <text:line-break/><text:span text:style-name="T1"> </text:span><text:span text:style-name="T2">(69/24) </text:span> ⲙⲉ ⲉⲧ’{ϩ̅ⲓ} ⲡⲥⲁⲛϩⲟⲩⲛ ⲧⲁⲙⲓⲟ ⲕⲁ‐ <text:line-break/><text:span text:style-name="T1"> </text:span><text:span text:style-name="T2">(69/25) </text:span> ⲧⲁ ⲡⲉϥⲧⲟⲛⲧⲛ̅· ⲧⲁⲓ̈ ⲧⲉ ⲑⲉ ϩⲱⲱϥ <text:line-break/><text:span text:style-name="T1"> </text:span><text:span text:style-name="T2">(69/26) </text:span> ⲙ̅ⲡⲣⲱⲙⲉ ⲉϥⲧⲁⲙⲓⲉ ⲛⲟⲩⲧⲉ {ϩ̅ⲓ}‐ <text:line-break/><text:span text:style-name="T1"> </text:span><text:span text:style-name="T2">(69/27) </text:span> ϫⲙ̅ ⲡⲕⲁϩ ⲕⲁⲧⲁ ⲡⲉϥⲉⲓⲛⲉ· ⲱ͂ ⲧⲣⲓⲥ‐ <text:line-break/><text:span text:style-name="T1"> </text:span><text:span text:style-name="T2">(69/28) </text:span> ⲙⲉⲅⲓⲥⲧⲉ ⲙⲏ ⲉⲕϣⲁϫⲉ· ⲁⲛⲧⲟⲩⲱⲧ’· <text:line-break/><text:span text:style-name="T1"> </text:span><text:span text:style-name="T2">(69/29) </text:span> ⲱ͂ ⲁⲥⲕⲗⲏⲡⲓⲉ ⲉⲕϣⲁϫⲉ ⲛ̅ⲧⲟⲕ <text:line-break/><text:span text:style-name="T1"> </text:span><text:span text:style-name="T2">(69/30) </text:span> ⲉⲛⲧⲟⲩⲱⲧ’· ⲕⲛⲁⲩ ϫⲉ ⲛ̅ⲧⲟⲕ ϩⲱ‐ <text:line-break/><text:span text:style-name="T1"> </text:span><text:span text:style-name="T2">(69/31) </text:span> ⲱⲕ ⲟⲛ ⲱ͂ ⲁⲥⲕⲗⲏⲡⲓⲉ ⲕⲉ ⲛ̅ⲛⲁ‐ <text:line-break/><text:span text:style-name="T1"> </text:span><text:span text:style-name="T2">(69/32) </text:span> ⲧⲛⲁϩⲧⲉ ⲉⲡϣⲁϫⲉ· ⲉⲕϣⲁϫⲉ <text:line-break/><text:span text:style-name="T1"> </text:span><text:span text:style-name="T2">(69/33) </text:span> ⲉⲛⲉⲧⲉ ⲟⲩⲛ̅ ⲯⲩⲭⲏ ⲙ̅ⲙⲟⲟⲩ {ϩ̅ⲓ} <text:line-break/><text:span text:style-name="T1"> </text:span><text:span text:style-name="T2">(69/34) </text:span> ⲛⲓϥⲉ ϫⲉ ⲛ̅ⲧⲟⲩⲟⲧⲉ· ⲛⲁⲓ̈ ⲉⲧⲣ̅ⲉ‐ <text:line-break/><text:span text:style-name="T1"> </text:span><text:span text:style-name="T2">(69/35) </text:span> ⲛⲉⲣⲅⲉⲓ ⲉⲛⲉⲓ̈ⲛⲟϭ ⲛ̅ϩⲃⲏⲟⲩⲉ· <text:line-break/><text:span text:style-name="T1"> </text:span><text:span text:style-name="T2">(69/36) </text:span> ⲉⲕϣⲁϫⲉ ⲉⲛⲁⲓ̈ ⲉⲧ’ϯ ⲛ̅ϩⲉⲛⲡⲣⲟ‐ <text:line-break/><text:span text:style-name="T1"> </text:span><text:span text:style-name="T2">(69/37) </text:span> ⲫⲏⲧⲓⲁ ϫⲉ ⲛ̅ⲧⲟⲩⲟⲧⲉ· ⲛⲁⲓ̈ ⲉⲧ’ϯ <text:line-break/><text:span text:style-name="T1"> </text:span><text:span text:style-name="T2">(70/1) </text:span> ⲛ̣̅ϣ̣[ⲱⲛⲉ ⲛ̅ⲛ̅ⲣⲱⲙⲉ ⲙⲛ̅ ⲡ]ⲉ̣ⲧ’ⲧⲗ̅ϭⲟ <text:line-break/><text:span text:style-name="T1"> </text:span><text:span text:style-name="T2">(70/2) </text:span> ⲉⲧ’[.....]ⲛⲙ̣̅ⲙⲟⲩ ϩⲱⲟⲩ· <text:line-break/><text:span text:style-name="T1"> </text:span><text:span text:style-name="T2">(70/3) </text:span> ⲏ%0 ⲉ[ⲕⲉ ⲛ̅ⲛ]ⲁ̣ⲧⲥⲟⲟⲩⲛ ⲱ̣͂ [ⲁⲥ]ⲕⲗⲏ‐ <text:line-break/><text:span text:style-name="T1"> </text:span><text:span text:style-name="T2">(70/4) </text:span> ⲡⲓⲉ ϫ̣ⲉ ⲕ[ⲏ]ⲙⲉ ⲉⲥϣⲟⲟⲡ’ ⲛ̣̅{ϩ̅ⲓ}‐ <text:line-break/><text:span text:style-name="T1"> </text:span><text:span text:style-name="T2">(70/5) </text:span> ⲕⲱⲛ ⲛ̅ⲧ[ⲡ]ⲉ· ⲛ̅ϩⲟⲩⲟ ⲇⲉ ⲡⲙⲁ <text:line-break/><text:span text:style-name="T1"> </text:span><text:span text:style-name="T2">(70/6) </text:span> ⲛ̅ϣⲱⲡⲉ ⲛ̣̅ⲧⲡⲉ ⲧⲉ ⲙⲛ̅ ⲛⲉⲛⲉⲣ‐ <text:line-break/><text:span text:style-name="T1"> </text:span><text:span text:style-name="T2">(70/7) </text:span> ⲅⲓⲁ ⲧⲏⲣⲟⲩ ⲉⲧ’ϩⲛ̅ ⲧⲡⲉ· ⲉϣϫⲉ <text:line-break/><text:span text:style-name="T1"> </text:span><text:span text:style-name="T2">(70/8) </text:span> ⲉϣϣⲉ ⲉⲧⲣⲉⲛϫⲱ ⲛ̅ⲧⲙⲉ· ⲡⲛ̅‐ <text:line-break/><text:span text:style-name="T1"> </text:span><text:span text:style-name="T2">(70/9) </text:span> ⲕⲁϩ ⲉϥϣⲟⲟⲡ’ ⲛ̅ⲣ̅ⲡⲉ ⲙ̅ⲡⲕⲟⲥ‐ <text:line-break/><text:span text:style-name="T1"> </text:span><text:span text:style-name="T2">(70/10) </text:span> ⲙⲟⲥ· ⲉϣϣⲉ ⲇⲉ ⲉⲣⲟⲕ ⲉⲧⲙ̅ⲣ̅ <text:line-break/><text:span text:style-name="T1"> </text:span><text:span text:style-name="T2">(70/11) </text:span> ⲁⲧⲥⲟⲟⲩⲛ ϫⲉ ⲟⲩⲛ̅ ⲟⲩⲟⲉⲓϣ <text:line-break/><text:span text:style-name="T1"> </text:span><text:span text:style-name="T2">(70/12) </text:span> ⲛⲁϣⲱⲡⲉ ⲛ̅ϩⲣⲁⲓ̈ ⲛ̅ϩⲏⲧϥ̅ ⲥⲉⲛⲁ‐ <text:line-break/><text:span text:style-name="T1"> </text:span><text:span text:style-name="T2">(70/13) </text:span> ⲟⲩⲱⲛϩ̅ ⲉⲃⲟⲗ ⲛ̅ϭⲓ ⲛ̅ⲣⲙ̅ⲛ̅ⲕⲏⲙⲉ <text:line-break/><text:span text:style-name="T1"> </text:span><text:span text:style-name="T2">(70/14) </text:span> ⲉⲁⲩ{ϩ̅ⲓ}ⲥⲉ ⲉⲧⲙⲛ̅ⲧⲛⲟⲩⲧⲉ ⲉ‐ <text:line-break/><text:span text:style-name="T1"> </text:span><text:span text:style-name="T2">(70/15) </text:span> ⲡϫⲓⲛϫⲏ· ⲁⲩⲱ ⲧⲟⲩⲡⲣⲁⲅⲙⲁⲧⲓⲁ <text:line-break/><text:span text:style-name="T1"> </text:span><text:span text:style-name="T2">(70/16) </text:span> ⲧⲏⲣⲥ̅ ϩⲛ̅ ⲧⲟⲩⲙⲛ̅ⲧ’ⲛⲟⲩⲧⲉ ⲥⲛⲁ‐ <text:line-break/><text:span text:style-name="T1"> </text:span><text:span text:style-name="T2">(70/17) </text:span> ϣⲱⲡⲉ ⲉⲥϣⲏⲥ· ⲧⲙⲛ̅ⲧⲛⲟⲩⲧⲉ <text:line-break/><text:span text:style-name="T1"> </text:span><text:span text:style-name="T2">(70/18) </text:span> ⲅⲁⲣ ⲧⲏⲣⲥ̅ ⲛⲁⲗⲟ ϩⲛ̅ ⲕⲏⲙⲉ ⲛ̅ⲥ‐ <text:line-break/><text:soft-page-break/><text:span text:style-name="T1"> </text:span><text:span text:style-name="T2">(70/19) </text:span> ⲡⲱⲧ’ ⲉϩⲣⲁⲓ̈ ⲉⲧⲡⲉ· ⲁⲩⲱ ⲕⲏⲙⲉ <text:line-break/><text:span text:style-name="T1"> </text:span><text:span text:style-name="T2">(70/20) </text:span> ⲛⲁⲣ̅ⲭⲏⲣⲉⲩⲉ· ϥⲛⲁⲣ̅ ϫⲁⲉⲓⲉ ⲛ̅ⲛ̅‐ <text:line-break/><text:span text:style-name="T1"> </text:span><text:span text:style-name="T2">(70/21) </text:span> ⲛⲟⲩⲧⲉ· ⲛⲁⲗⲗⲟⲫⲩⲗⲟⲥ ⲅⲁⲣ ⲛ̅‐ <text:line-break/><text:span text:style-name="T1"> </text:span><text:span text:style-name="T2">(70/22) </text:span> ⲛⲏⲩ ⲉϩⲟⲩⲛ ⲉⲕⲏⲙⲉ ⲛ̅ⲥⲉⲣ̅ ϫⲟ‐ <text:line-break/><text:span text:style-name="T1"> </text:span><text:span text:style-name="T2">(70/23) </text:span> ⲉⲓⲥ ⲉⲣⲟϥ ⲕⲏⲙⲉ ⲛ̅ϩⲟⲩⲟ ⲇⲉ ⲛ̅‐ <text:line-break/><text:span text:style-name="T1"> </text:span><text:span text:style-name="T2">(70/24) </text:span> ⲣⲙ̅ⲛ̅ⲕⲏⲙⲉ ⲥⲉⲛⲁⲣ̅ⲕⲱⲗⲩⲉ <text:line-break/><text:span text:style-name="T1"> </text:span><text:span text:style-name="T2">(70/25) </text:span> ⲙ̅ⲙⲟⲟⲩ ⲉⲧⲣⲉⲩϣⲙ̅ϣⲉ ⲙ̅ⲡ’‐ <text:line-break/><text:span text:style-name="T1"> </text:span><text:span text:style-name="T2">(70/26) </text:span> ⲛⲟⲩⲧⲉ· ⲛ̅ϩⲟⲩⲟ ⲇⲉ ⲥⲉⲛⲁϣⲱ‐ <text:line-break/><text:span text:style-name="T1"> </text:span><text:span text:style-name="T2">(70/27) </text:span> ⲡⲉ ϩⲛ̅ ⲑⲁⲏ ⲛ̅ⲧⲓⲙⲱⲣⲓⲁ· ⲡⲉⲧⲟⲩ‐ <text:line-break/><text:span text:style-name="T1"> </text:span><text:span text:style-name="T2">(70/28) </text:span> ⲛⲁϩⲉ ⲇⲉ ⲉⲣⲟϥ ⲛ̅ϩⲏⲧⲟⲩ ⲉϥϣⲙ̅‐ <text:line-break/><text:span text:style-name="T1"> </text:span><text:span text:style-name="T2">(70/29) </text:span> ϣⲉ ⲉϥⲣ̅ⲥⲉⲃⲉⲥⲑⲁⲓ ⲙ̅ⲡⲛⲟⲩⲧⲉ <text:line-break/><text:span text:style-name="T1"> </text:span><text:span text:style-name="T2">(70/30) </text:span> ⲙ̅ⲫⲟⲟⲩ ⲇⲉ ⲉⲧⲙ̅ⲙⲁⲩ ⲧⲭⲱⲣⲁ <text:line-break/><text:span text:style-name="T1"> </text:span><text:span text:style-name="T2">(70/31) </text:span> ⲉⲧⲉ ⲛ̅ⲣⲙ̅ⲛ̅ⲛⲟⲩⲧⲉ ⲡⲁⲣⲁ ⲛ̅ⲭⲱ‐ <text:line-break/><text:span text:style-name="T1"> </text:span><text:span text:style-name="T2">(70/32) </text:span> ⲣⲁ ⲧⲏⲣⲟⲩ ⲥⲛⲁϣⲱⲡⲉ ⲉⲥⲉ ⲛ̅‐ <text:line-break/><text:span text:style-name="T1"> </text:span><text:span text:style-name="T2">(70/33) </text:span> ⲁⲥⲉⲃⲏⲥ· ⲟⲩⲕⲉⲧⲓ ⲥⲁⲙⲟⲩϩ <text:line-break/><text:span text:style-name="T1"> </text:span><text:span text:style-name="T2">(70/34) </text:span> ⲛ̅ⲣ̅ⲡⲉ ⲁⲗⲗⲁ ⲥⲁⲙⲟⲩϩ ⲛ̅ⲧⲁⲫⲟⲥ· <text:line-break/><text:span text:style-name="T1"> </text:span><text:span text:style-name="T2">(70/35) </text:span> ⲟⲩⲧⲉ ⲉⲥⲁⲙⲟⲩϩ ⲁⲛ ⲛ̅ⲛⲟⲩⲧⲉ <text:line-break/><text:span text:style-name="T1"> </text:span><text:span text:style-name="T2">(70/36) </text:span> ⲁⲗⲗⲁ ϩⲉⲛⲕⲱⲱⲥ· ⲱ͂ ⲕⲏⲙⲉ <text:line-break/><text:span text:style-name="T1"> </text:span><text:span text:style-name="T2">(70/37) </text:span> ⲕⲏⲙⲉ ⲇⲉ ⲛⲁϣⲱⲡⲉ ⲛ̅ⲑⲉ ⲛ̅ⲛⲓ‐ <text:line-break/><text:span text:style-name="T1"> </text:span><text:span text:style-name="T2">(70/38) </text:span> ϣⲃⲱⲱⲥ· ⲁⲩⲱ ⲛⲉⲕⲑⲉⲓⲟⲛ <text:line-break/><text:span text:style-name="T1"> </text:span><text:span text:style-name="T2">(71/1) </text:span> ⲥⲉⲛⲁⲛ̅[..]ⲩⲧⲟⲩⲁ̣[...] ⲛ̣̅ϩⲃ̣[ⲏ]‐ <text:line-break/><text:span text:style-name="T1"> </text:span><text:span text:style-name="T2">(71/2) </text:span> ⲟⲩ̣ⲉ̣ ⲛ̅ϣ̣ⲡⲏⲣⲉ ⲙⲛ̅ .[....]ϫⲉ <text:line-break/><text:span text:style-name="T1"> </text:span><text:span text:style-name="T2">(71/3) </text:span> ⲉ̣.[..]. ⲁⲩⲱ ⲉϣ[ϫ]ⲉ ϩⲉ̣ⲛⲱⲛⲉ <text:line-break/><text:span text:style-name="T1"> </text:span><text:span text:style-name="T2">(71/4) </text:span> ⲛⲉ ⲛⲉⲕϣⲁϫⲉ ⲉⲧ̣[ⲉ] ⲛ̅ϣⲡⲏⲣⲉ <text:line-break/><text:span text:style-name="T1"> </text:span><text:span text:style-name="T2">(71/5) </text:span> ⲁⲩⲱ ⲡⲃⲁⲣⲃⲁⲣⲟⲥ̣ ⲛ̣ⲁⲥⲱⲧⲡ̅’ <text:line-break/><text:span text:style-name="T1"> </text:span><text:span text:style-name="T2">(71/6) </text:span> ⲛ̅ϩⲟⲩⲟ ⲉⲣⲟⲕ· ⲛ̅ⲧⲟⲕ ⲱ͂ [ⲡ]ⲣⲙ̅ⲛ̅‐ <text:line-break/><text:span text:style-name="T1"> </text:span><text:span text:style-name="T2">(71/7) </text:span> ⲕⲏⲙⲉ ϩⲛ̅ ⲧⲉϥⲙⲛ̅ⲧⲛⲟⲩⲧⲉ ⲏ%0 ⲟⲩ‐ <text:line-break/><text:span text:style-name="T1"> </text:span><text:span text:style-name="T2">(71/8) </text:span> ⲥⲕⲩⲑⲏⲥ ⲏ%0 ’ⲛ̅←ϩⲛ̅ⲧⲟⲩ· ⲏ%0 ϭⲉ ⲛ̅‐ <text:line-break/><text:span text:style-name="T1"> </text:span><text:span text:style-name="T2">(71/9) </text:span> ⲧⲉⲓ̈ⲙⲓⲛⲉ· ⲟⲩ ⲇⲉ ⲡⲉϯϫⲱ ⲙ̅ⲙⲟϥ <text:line-break/><text:span text:style-name="T1"> </text:span><text:span text:style-name="T2">(71/10) </text:span> ⲉⲡⲣⲙ̅ⲛ̅ⲕⲏⲙⲉ· ⲥⲉⲛⲁⲕⲱ ⲅⲁⲣ ⲛ̅‐ <text:line-break/><text:span text:style-name="T1"> </text:span><text:span text:style-name="T2">(71/11) </text:span> ⲥⲱⲟⲩ ⲛ̅ⲕⲏⲙⲉ ⲁⲛ· ⲡⲥⲟⲡ’ ⲅⲁⲣ ⲛ̅‐ <text:line-break/><text:span text:style-name="T1"> </text:span><text:span text:style-name="T2">(71/12) </text:span> ⲧⲁⲛⲛⲟⲩⲧⲉ ⲕⲱ ⲛ̅ⲥⲱⲟⲩ ⲙ̅ⲡⲕⲁϩ <text:line-break/><text:span text:style-name="T1"> </text:span><text:span text:style-name="T2">(71/13) </text:span> ⲛ̅ⲕⲏⲙⲉ ⲁⲩⲱ ⲁⲩⲡⲱⲧ’ ⲉ̣ϩⲣⲁⲓ̈ ⲉ‐ <text:line-break/><text:span text:style-name="T1"> </text:span><text:span text:style-name="T2">(71/14) </text:span> ⲧⲡⲉ· ⲧⲟⲧⲉ ⲛ̅ⲣⲙ̅ⲛ̅ⲕⲏⲙⲉ ⲧⲏⲣⲟⲩ <text:line-break/><text:span text:style-name="T1"> </text:span><text:span text:style-name="T2">(71/15) </text:span> ⲛⲁⲙⲟⲩ· ⲁⲩⲱ ⲕⲏⲙⲉ ⲛⲁϣⲱⲡⲉ <text:line-break/><text:span text:style-name="T1"> </text:span><text:span text:style-name="T2">(71/16) </text:span> ⲉϥϣⲏϥ ⲛ̅ⲛ̅ⲛⲟⲩⲧⲉ ⲙⲛ̅ ⲛ̅ⲣⲙ̅ⲛ̅‐ <text:line-break/><text:span text:style-name="T1"> </text:span><text:span text:style-name="T2">(71/17) </text:span> ⲕⲏⲙⲉ· ⲛ̅ⲧⲟⲕ ⲇⲉ ⲱ͂ ⲡⲓ’ⲉ←ⲣⲟ ⲟⲩⲛ̅ <text:line-break/><text:span text:style-name="T1"> </text:span><text:span text:style-name="T2">(71/18) </text:span> ⲟⲩϩⲟⲟⲩ ⲛⲁϣⲱⲡⲉ ⲛ̅ⲅ’ϩⲉϯⲉ <text:line-break/><text:span text:style-name="T1"> </text:span><text:span text:style-name="T2">(71/19) </text:span> ⲛ̅ⲥⲛⲟϥ ⲛ̅ϩⲟⲩⲟ ⲉⲡⲙⲟⲟⲩ· ⲁⲩⲱ <text:line-break/><text:span text:style-name="T1"> </text:span><text:span text:style-name="T2">(71/20) </text:span> ⲛ̅ⲥⲱⲙⲁ ⲉⲧ’ⲙⲟⲟⲩⲧ’ ⲥⲉⲛⲁϣⲱ‐ <text:line-break/><text:span text:style-name="T1"> </text:span><text:span text:style-name="T2">(71/21) </text:span> ⲡⲉ ⲉⲩϫⲟⲥⲉ ⲛ̅ϩⲟⲩⲟ ⲁⲛⲧⲏⲛⲉ· <text:line-break/><text:span text:style-name="T1"> </text:span><text:span text:style-name="T2">(71/22) </text:span> ⲁⲩⲱ ⲥⲉⲛⲁⲣⲓⲙⲉ ⲁⲛ ⲙ̅ⲡⲉⲧ’ⲙⲟ‐ <text:line-break/><text:span text:style-name="T1"> </text:span><text:span text:style-name="T2">(71/23) </text:span> ⲟⲩⲧ’ ⲛ̅ⲑⲉ ⲙ̅ⲡⲉⲧⲟⲛϩ̅· ⲥⲉⲛⲁ‐ <text:line-break/><text:span text:style-name="T1"> </text:span><text:span text:style-name="T2">(71/24) </text:span> ⲙⲉⲉⲩⲉ ⲙⲉⲛ ⲉⲣⲟϥ ϫⲉ ⲟⲩⲣⲙ̅ⲛ̅‐ <text:line-break/><text:span text:style-name="T1"> </text:span><text:span text:style-name="T2">(71/25) </text:span> ⲕⲏⲙⲉ ⲡⲉ ⲉⲧⲃⲉ ⲧⲉϥⲁⲥⲡⲉ ⲙ̅‐ <text:line-break/><text:span text:style-name="T1"> </text:span><text:span text:style-name="T2">(71/26) </text:span> ⲡⲙⲉϩ ⲥⲟⲡ’ ⲥⲛⲁⲩ· ⲱ͂ ⲁⲥⲕⲗⲏⲡⲓⲉ <text:line-break/><text:span text:style-name="T1"> </text:span><text:span text:style-name="T2">(71/27) </text:span> ⲁϩⲣⲟⲕ ⲉⲕⲣⲓⲙⲉ· ϥⲛⲁⲟⲩⲱⲛϩ̅ <text:line-break/><text:soft-page-break/><text:span text:style-name="T1"> </text:span><text:span text:style-name="T2">(71/28) </text:span> ⲉⲃⲟⲗ ϩⲱⲥ ⲁⲗⲗⲟⲫⲩⲗⲟⲥ ⲕⲁⲧⲁ <text:line-break/><text:span text:style-name="T1"> </text:span><text:span text:style-name="T2">(71/29) </text:span> ⲛⲉϥϩⲃⲏⲟⲩⲉ· ⲕⲏⲙⲉ ⲛ̅ⲑⲉⲓⲟⲛ <text:line-break/><text:span text:style-name="T1"> </text:span><text:span text:style-name="T2">(71/30) </text:span> ϥⲛⲁϣⲉⲡ’ ϩⲉⲛⲡⲉⲑⲟⲟⲩ ⲉⲛⲉⲁⲩ <text:line-break/><text:span text:style-name="T1"> </text:span><text:span text:style-name="T2">(71/31) </text:span> ⲉⲛⲁⲓ̈· ⲕⲏⲙⲉ ⲙ̅ⲙⲁⲉⲓⲛⲟⲩⲧⲉ· <text:line-break/><text:span text:style-name="T1"> </text:span><text:span text:style-name="T2">(71/32) </text:span> ⲁⲩⲱ ⲡⲙⲁ ⲛ̅ϣⲱⲡⲉ ⲛ̅ⲛ̅ⲛⲟⲩⲧⲉ <text:line-break/><text:span text:style-name="T1"> </text:span><text:span text:style-name="T2">(71/33) </text:span> ⲙ̅ⲙⲁ ⲛ̅ϯ ⲥⲃⲱ ⲛ̅ⲧⲙⲛ̅ⲧ’ⲛⲟⲩⲧⲉ <text:line-break/><text:span text:style-name="T1"> </text:span><text:span text:style-name="T2">(71/34) </text:span> ϥⲛⲁϣⲱⲡⲉ ⲛ̅{ϩ̅ⲓ}ⲕⲱⲛ ⲛ̅ⲧⲙⲛ̅ⲧ‐ <text:line-break/><text:span text:style-name="T1"> </text:span><text:span text:style-name="T2">(71/35) </text:span> ⲁⲥⲉⲃⲏⲥ· ⲁⲩⲱ ⲙ̅ⲫⲟⲟⲩ ⲉⲧⲙ̅‐ <text:line-break/><text:span text:style-name="T1"> </text:span><text:span text:style-name="T2">(71/36) </text:span> ⲙⲉⲩ ⲥⲉⲛⲁⲣ̅ ⲑⲁⲩⲙⲁ ⲁⲛ ⲙ̅ⲡⲕⲟⲥⲙⲟⲥ <text:line-break/><text:span text:style-name="T1"> </text:span><text:span text:style-name="T2">(72/1) </text:span> .[.....] ⲙⲛ̅ ⲧⲙ̣[ⲛ̅ⲧ’ⲁ]ⲧ’̣ⲙ̣ⲟ̣ⲩ <text:line-break/><text:span text:style-name="T1"> </text:span><text:span text:style-name="T2">(72/2) </text:span> ⲟⲩ[ⲧⲉ ⲥ]ⲉⲛⲁⲟⲩⲱ̣ϣ̣ⲧ̅’̣ ⲙ̣̅[ⲙⲟϥ] <text:line-break/><text:span text:style-name="T1"> </text:span><text:span text:style-name="T2">(72/3) </text:span> ⲁⲛ[.....]. ⲉⲛϫⲱ ⲙ̅ⲙ̣[ⲟⲥ ϫ]ⲉ̣ ⲛⲁ‐ <text:line-break/><text:span text:style-name="T1"> </text:span><text:span text:style-name="T2">(72/4) </text:span> ⲛⲟⲩϥ ⲛ.[.]ⲱϥ ⲁⲛ· ⲟⲩⲧ[ⲉ] ⲙ̅‐ <text:line-break/><text:span text:style-name="T1"> </text:span><text:span text:style-name="T2">(72/5) </text:span> ⲡⲉϥϣⲱ[ⲡⲉ] ⲛ̅ⲟⲩⲁ ⲛ̅ⲟⲩⲱⲧ’· ⲟⲩ‐ <text:line-break/><text:span text:style-name="T1"> </text:span><text:span text:style-name="T2">(72/6) </text:span> ⲧⲉ ⲛ̣̅ⲑⲉⲱ̣[ⲣ]ⲓⲁ· ⲁⲗⲗⲁ ϥⲣ̅ⲕⲓⲛⲇⲩ‐ <text:line-break/><text:span text:style-name="T1"> </text:span><text:span text:style-name="T2">(72/7) </text:span> ⲛⲉ[ⲩ]ⲉ ⲉⲧⲣⲉϥϣⲱⲡⲉ ⲛ̅ⲃⲁⲣⲟⲥ <text:line-break/><text:span text:style-name="T1"> </text:span><text:span text:style-name="T2">(72/8) </text:span> ⲛ̅ⲛ̅ⲣⲱⲙⲉ ⲧⲏⲣⲟⲩ· ⲇⲓⲁ ⲧⲟⲩⲧⲟ̣ <text:line-break/><text:span text:style-name="T1"> </text:span><text:span text:style-name="T2">(72/9) </text:span> ⲥⲉⲛⲁⲕⲁⲧⲁⲫⲣⲟⲛⲓ ⲙ̅ⲙⲟϥ· ⲡⲕⲟ‐ <text:line-break/><text:span text:style-name="T1"> </text:span><text:span text:style-name="T2">(72/10) </text:span> ⲥⲙⲟⲥ ⲉⲧⲛⲉⲥⲱϥ ⲛ̅ⲧⲉ ⲡⲛⲟⲩ‐ <text:line-break/><text:span text:style-name="T1"> </text:span><text:span text:style-name="T2">(72/11) </text:span> ⲧⲉ· ⲫⲱⲃ ⲉⲙⲛ̅ ⲡⲉⲧ’ⲧⲛ̅ⲧⲱⲛ <text:line-break/><text:span text:style-name="T1"> </text:span><text:span text:style-name="T2">(72/12) </text:span> ⲉⲣⲟϥ· ⲧⲉⲛⲉⲣⲅⲉⲓⲁ ⲉⲧⲉ ⲟⲩⲛ̅‐ <text:line-break/><text:span text:style-name="T1"> </text:span><text:span text:style-name="T2">(72/13) </text:span> ⲧⲁⲥ ⲙ̅ⲙⲁⲩ ⲛ̅ⲧⲁⲣⲉⲧⲏ· ⲑⲉⲱⲣⲓⲁ <text:line-break/><text:span text:style-name="T1"> </text:span><text:span text:style-name="T2">(72/14) </text:span> ⲉⲧⲉ̣ ⲛ̅ϩⲁϩ ⲛ̅ⲥⲙⲟⲧ’· ⲧⲭⲟⲣⲏⲅⲓⲁ <text:line-break/><text:span text:style-name="T1"> </text:span><text:span text:style-name="T2">(72/15) </text:span> ⲉⲙⲁⲥⲣ̅ⲫⲑⲟⲛⲓ· ⲡⲉⲧ’ⲙⲉϩ <text:line-break/><text:span text:style-name="T1"> </text:span><text:span text:style-name="T2">(72/16) </text:span> ⲛ̅ⲑⲉⲱⲣⲓⲁ ⲛⲓⲙ· ⲥⲉⲛⲁⲥⲉⲧⲡ̅’ <text:line-break/><text:span text:style-name="T1"> </text:span><text:span text:style-name="T2">(72/17) </text:span> ⲡⲕⲁⲕⲉ ⲛ̅ϩⲟⲩⲟ ⲉⲡⲟⲩⲟⲉⲓⲛ· <text:line-break/><text:span text:style-name="T1"> </text:span><text:span text:style-name="T2">(72/18) </text:span> ⲁⲩⲱ ⲥⲉⲛⲁⲥⲉⲧⲡ̅’ ⲡⲙⲟⲩ ⲉ‐ <text:line-break/><text:span text:style-name="T1"> </text:span><text:span text:style-name="T2">(72/19) </text:span> ⲡⲱⲛϩ̅· ⲙⲛ̅ ⲗⲁⲁⲩ ⲛⲁⲉⲓⲱⲣⲙ̅ <text:line-break/><text:span text:style-name="T1"> </text:span><text:span text:style-name="T2">(72/20) </text:span> ⲉϩⲣⲁⲓ̈ ⲉⲧⲡⲉ· ⲡⲣⲙ̅ⲛ̅ⲛⲟⲩⲧⲉ ⲇⲉ <text:line-break/><text:span text:style-name="T1"> </text:span><text:span text:style-name="T2">(72/21) </text:span> ⲥⲉⲛⲁⲟⲡϥ̅ ϩⲱⲥ ⲣⲉϥⲗⲟⲃⲉ· ⲡⲁ‐ <text:line-break/><text:span text:style-name="T1"> </text:span><text:span text:style-name="T2">(72/22) </text:span> ⲥⲉⲃⲏⲥ ⲇⲉ ⲛ̅ⲣⲱⲙⲉ ⲥⲉⲛⲁⲧⲁ‐ <text:line-break/><text:span text:style-name="T1"> </text:span><text:span text:style-name="T2">(72/23) </text:span> ⲉⲓⲟϥ ϩⲱⲥ ⲥⲁⲃⲉ· ⲡⲥⲁⲛⲣ̅ ϩⲟⲧⲉ <text:line-break/><text:span text:style-name="T1"> </text:span><text:span text:style-name="T2">(72/24) </text:span> ⲥⲉⲛⲁⲟⲡϥ̅ ϩⲱⲥ ϫⲱⲣⲉ· ⲁⲩⲱ <text:line-break/><text:span text:style-name="T1"> </text:span><text:span text:style-name="T2">(72/25) </text:span> ⲥⲉⲛⲁⲕⲟⲗⲁⲍⲉ ⲙ̅ⲡⲁⲅⲁⲑⲟⲥ ⲛ̅‐ <text:line-break/><text:span text:style-name="T1"> </text:span><text:span text:style-name="T2">(72/26) </text:span> ⲣⲱⲙⲉ ϩⲱⲥ ⲣⲱⲙⲉ ⲉϥϩⲟⲟⲩ· <text:line-break/><text:span text:style-name="T1"> </text:span><text:span text:style-name="T2">(72/27) </text:span> ⲉⲧⲃⲉ ⲧⲯⲩⲭⲏ ⲇⲉ ⲙⲛ̅ ⲛ̅ϩⲃⲏⲩⲉ <text:line-break/><text:span text:style-name="T1"> </text:span><text:span text:style-name="T2">(72/28) </text:span> ⲛ̅ⲧⲯⲩⲭⲏ ⲙⲛ̅ ⲛⲁ ⲧⲙⲛ̅ⲧ’ⲁⲧⲙⲟⲩ <text:line-break/><text:span text:style-name="T1"> </text:span><text:span text:style-name="T2">(72/29) </text:span> ⲙⲛ̅ ⲡⲕⲉⲥⲉⲉⲡⲉ ⲛ̅ⲧⲁⲉⲓϫⲟⲟⲩ <text:line-break/><text:span text:style-name="T1"> </text:span><text:span text:style-name="T2">(72/30) </text:span> ⲉⲣⲱⲧⲛ̅ ⲱ͂ ⲧⲁⲧ’ ⲙⲛ̅ ⲁⲥⲕⲗⲏⲡⲓⲉ <text:line-break/><text:span text:style-name="T1"> </text:span><text:span text:style-name="T2">(72/31) </text:span> ⲙⲛ̅ ⲁⲙⲙⲱⲛ· ⲟⲩ ⲙⲟⲛⲟⲛ ⲥⲉ‐ <text:line-break/><text:span text:style-name="T1"> </text:span><text:span text:style-name="T2">(72/32) </text:span> ⲛⲁⲙⲉⲉⲩⲉ ⲉⲣⲟⲟⲩ ϫⲉ ⲟⲩⲥⲱ‐ <text:line-break/><text:span text:style-name="T1"> </text:span><text:span text:style-name="T2">(72/33) </text:span> ⲃⲉ ⲡⲉ· ⲁⲗⲗⲁ ⲥⲉⲛⲁⲣ̅ ⲡⲕⲉⲥⲡⲁ‐ <text:line-break/><text:span text:style-name="T1"> </text:span><text:span text:style-name="T2">(72/34) </text:span> ⲧⲁⲗⲁ ⲙ̅ⲙⲟⲟⲩ· ⲁⲗⲗⲁ ⲉⲣⲓⲡⲓⲥⲧⲉⲩ‐ <text:line-break/><text:span text:style-name="T1"> </text:span><text:span text:style-name="T2">(72/35) </text:span> ⲉ ⲛⲁⲓ̈ ϫⲉ ⲛⲁⲓ̈ ⲛ̅ⲧⲉⲓ̈ⲙⲓⲛⲉ ⲥⲉⲛⲁ‐ <text:line-break/><text:span text:style-name="T1"> </text:span><text:span text:style-name="T2">(72/36) </text:span> ϭⲓⲛⲇⲩⲛⲉⲩⲉ ϩⲙ̅ ⲡϩⲁⲉ ⲛ̅ϭⲓⲛⲇⲩ‐ <text:line-break/><text:span text:style-name="T1"> </text:span><text:span text:style-name="T2">(72/37) </text:span> ⲛⲟⲥ ⲛ̅ⲧⲟⲩⲯⲩⲭⲏ· ⲁⲩⲱ ⲥⲉ‐ <text:line-break/><text:span text:style-name="T1"> </text:span><text:span text:style-name="T2">(72/38) </text:span> ⲛⲁⲥⲙ̅ⲛ ⲟⲩⲛⲟⲙⲟⲥ ⲛ̅ⲃⲣ̅ⲣⲉ <text:line-break/><text:soft-page-break/><text:span text:style-name="T1"> </text:span><text:span text:style-name="T2">(73/1) </text:span> (line 1 lacking) <text:line-break/><text:span text:style-name="T1"> </text:span><text:span text:style-name="T2">(73/2) </text:span> [ 19+- ]ⲁ̣ⲛ̣ <text:line-break/><text:span text:style-name="T1"> </text:span><text:span text:style-name="T2">(73/3) </text:span> [ 18+- ⲥ]ⲉⲛⲁ <text:line-break/><text:span text:style-name="T1"> </text:span><text:span text:style-name="T2">(73/4) </text:span> [ 19+- ]ⲱⲛ <text:line-break/><text:span text:style-name="T1"> </text:span><text:span text:style-name="T2">(73/5) </text:span> ⲛ̅ⲁⲅⲁⲑ̣[ⲟⲥ·] ⲛ̣̅ⲁ̣[ⲅ’ⲅⲉ]ⲗ̣ⲟ̣[ⲥ ⲙ̅]ⲡⲟ <text:line-break/><text:span text:style-name="T1"> </text:span><text:span text:style-name="T2">(73/6) </text:span> ⲛ̣ⲏⲣⲟⲥ [ⲥ]ⲉⲛⲁϣⲱ̣ϫⲡ̅’ ⲟ̣[ⲩⲁ]ⲉⲧⲟⲩ <text:line-break/><text:span text:style-name="T1"> </text:span><text:span text:style-name="T2">(73/7) </text:span> ⲛ̅ⲛ̅ⲣⲱⲙⲉ ⲉⲩϣⲟⲟⲡ’ ⲛⲙ̣̅ⲙⲁⲩ <text:line-break/><text:span text:style-name="T1"> </text:span><text:span text:style-name="T2">(73/8) </text:span> ⲉⲩⲥⲱⲕ ϩⲏⲧ̣ⲟⲩ ⲁϩⲟⲩⲛ ⲁⲙⲡⲉⲧ’‐ <text:line-break/><text:span text:style-name="T1"> </text:span><text:span text:style-name="T2">(73/9) </text:span> ϩⲟⲟⲩ ϩⲛ̅ ⲟⲩⲧⲟⲗⲙⲏⲣⲓⲁ· ⲁⲩⲱ ⲁϩⲟⲩⲛ <text:line-break/><text:span text:style-name="T1"> </text:span><text:span text:style-name="T2">(73/10) </text:span> ⲁⲛⲙⲛ̅ⲧ’ⲁⲧⲛⲟⲩⲧⲉ ⲙⲛ̅ ϩⲉⲛⲡⲟⲗⲉ‐ <text:line-break/><text:span text:style-name="T1"> </text:span><text:span text:style-name="T2">(73/11) </text:span> ⲙⲟⲥ ⲙⲛ̅ ϩⲉⲛⲧⲱⲣⲡ̅’ ⲉⲩϯ ⲥⲃⲱ ⲛⲁⲩ <text:line-break/><text:span text:style-name="T1"> </text:span><text:span text:style-name="T2">(73/12) </text:span> ⲉϩ̣ⲙ̅ⲡⲁ̣[ⲣ]ⲁⲫⲩⲥⲓⲥ· ϩⲛ̅ ⲛ̣̅ϩⲟⲟⲩ ⲉ‐ <text:line-break/><text:span text:style-name="T1"> </text:span><text:span text:style-name="T2">(73/13) </text:span> ⲧⲙ̅ⲙⲁⲩ ⲡⲕⲁϩ ⲛⲁⲥⲙⲛ̅[ⲧ]ϥ̅ ⲁⲛ· <text:line-break/><text:span text:style-name="T1"> </text:span><text:span text:style-name="T2">(73/14) </text:span> ⲁⲩⲱ ⲥⲉⲛⲁⲡⲗⲉⲁ ⲁⲛ ϩⲛ̅ ⲑⲁⲗⲁⲥⲥⲁ <text:line-break/><text:span text:style-name="T1"> </text:span><text:span text:style-name="T2">(73/15) </text:span> ⲟⲩⲧⲉ ⲥⲉⲛⲁⲥⲟⲩⲱⲛ ⲛ̅ⲥⲓⲟⲩ ⲁⲛ <text:line-break/><text:span text:style-name="T1"> </text:span><text:span text:style-name="T2">(73/16) </text:span> ⲉⲧ’ϩⲛ̅ ⲧⲡⲉ· ⲥⲙⲏ ⲛⲓⲙ ⲉⲧⲟⲩⲁⲁⲃ <text:line-break/><text:span text:style-name="T1"> </text:span><text:span text:style-name="T2">(73/17) </text:span> ⲛ̅ⲧⲉ ⲡⲗⲟⲅⲟⲥ ⲙ̅ⲡⲛⲟⲩⲧⲉ ⲥⲉⲛⲁ‐ <text:line-break/><text:span text:style-name="T1"> </text:span><text:span text:style-name="T2">(73/18) </text:span> ⲕⲁⲣⲱⲟⲩ ⲉⲣⲟϥ· ⲡⲁⲏⲣ ⲇⲉ ⲛⲁϣⲱ‐ <text:line-break/><text:span text:style-name="T1"> </text:span><text:span text:style-name="T2">(73/19) </text:span> ⲛⲉ· ⲧⲁⲓ̈ ⲧⲉ {ⲧⲉ} ⲧⲙⲛⲧ’ϩⲗ̅ⲗⲟ ⲙ̅ⲡⲕⲟ‐ <text:line-break/><text:span text:style-name="T1"> </text:span><text:span text:style-name="T2">(73/20) </text:span> ⲥⲙⲟⲥ· ⲧⲙⲛ̅ⲧ’ⲁⲧⲛⲟⲩⲧⲉ ⲙⲛ̅ <text:line-break/><text:span text:style-name="T1"> </text:span><text:span text:style-name="T2">(73/21) </text:span> ⲧⲙⲛ̅ⲧ’ⲁⲧⲉⲟⲟⲩ· ⲁⲩⲱ ⲧⲙⲛ̅ⲧ’ⲁⲧ’‐ <text:line-break/><text:span text:style-name="T1"> </text:span><text:span text:style-name="T2">(73/22) </text:span> ⲗⲟⲅⲟⲥ ⲛ̅ⲛ̅ⲱⲁϫⲉ ⲉⲧⲛⲁⲛⲟⲩⲟⲩ· <text:line-break/><text:span text:style-name="T1"> </text:span><text:span text:style-name="T2">(73/23) </text:span> ⲉⲣⲉϣⲁⲛⲁⲓ̈ ⲇⲉ ϣⲱⲡⲉ ⲱ͂ ⲁⲥⲕⲗⲏ‐ <text:line-break/><text:span text:style-name="T1"> </text:span><text:span text:style-name="T2">(73/24) </text:span> ⲡⲓⲉ ⲧⲟⲧⲉ ⲡϫⲟⲉⲓⲥ ⲡⲉⲓⲱⲧ’ ⲁⲩⲱ <text:line-break/><text:span text:style-name="T1"> </text:span><text:span text:style-name="T2">(73/25) </text:span> ⲡⲛⲟⲩⲧⲉ ⲙ̅ⲡϣⲟⲣⲡ̅’ ⲟⲩⲁⲁϥ· ⲡⲛⲟⲩ‐ <text:line-break/><text:span text:style-name="T1"> </text:span><text:span text:style-name="T2">(73/26) </text:span> ⲧⲉ ⲡⲇⲏⲙⲓⲟⲩⲣⲅⲟⲥ ⲉⲁϥϭⲱϣⲧ̅’ ⲉ‐ <text:line-break/><text:span text:style-name="T1"> </text:span><text:span text:style-name="T2">(73/27) </text:span> ϫⲛ̅ ⲛⲉⲣϣⲱⲡⲉ· ⲁⲩⲱ ⲡⲉϥϣⲟ‐ <text:line-break/><text:span text:style-name="T1"> </text:span><text:span text:style-name="T2">(73/28) </text:span> ϫⲛⲉ ⲉⲧⲉ ⲡⲁⲅⲁⲑⲟⲛ ⲡⲉ ⲁϥⲥⲁ‐ <text:line-break/><text:span text:style-name="T1"> </text:span><text:span text:style-name="T2">(73/29) </text:span> ϩⲱϥ ⲉⲣⲁⲧϥ̅ ⲉϫⲛ̅ ⲧⲁⲧⲁⲝⲓⲁ· ⲁϥϥⲓ ⲛ̅‐ <text:line-break/><text:span text:style-name="T1"> </text:span><text:span text:style-name="T2">(73/30) </text:span> ⲧⲡⲗⲁⲛⲏ ⲙ̅ⲙⲁⲩ· ⲁⲩⲱ ⲧⲕⲁϭⲓⲁ <text:line-break/><text:span text:style-name="T1"> </text:span><text:span text:style-name="T2">(73/31) </text:span> ⲁϥϭⲱϫⲉ ⲙ̅ⲙⲟⲥ· ϩⲉⲛⲥⲟⲡ’ ⲙⲉⲛ <text:line-break/><text:span text:style-name="T1"> </text:span><text:span text:style-name="T2">(73/32) </text:span> ⲁϥⲟⲙⲉⲥ ϩⲛ̅ ⲟⲩⲛⲟϭ ⲙ̅ⲙⲟⲟⲩ· <text:line-break/><text:span text:style-name="T1"> </text:span><text:span text:style-name="T2">(73/33) </text:span> ϩⲉⲛⲕⲉⲥⲟⲡ’ ⲇⲉ ⲁϥⲣⲟⲕϩⲥ̅ ϩⲛ̅ ⲟⲩ‐ <text:line-break/><text:span text:style-name="T1"> </text:span><text:span text:style-name="T2">(73/34) </text:span> ⲕⲱϩⲧ̅’ ⲉϥϫⲁⲃⲁⲁⲧ’· ϩⲉⲛⲕⲉⲥⲟⲡ’ <text:line-break/><text:span text:style-name="T1"> </text:span><text:span text:style-name="T2">(73/35) </text:span> ⲇⲉ ⲁϥⲗⲱϫϩ̅ ⲙ̅ⲙⲟⲥ ϩⲛ̅ ϩⲉⲛⲡⲟⲗⲉ‐ <text:line-break/><text:span text:style-name="T1"> </text:span><text:span text:style-name="T2">(73/36) </text:span> ⲙⲟⲥ ⲙⲛ̅ ϩⲉⲛⲗⲟⲓⲙⲟⲥ· ϣⲁⲛⲧϥ̅ⲉⲓⲛⲉ <text:line-break/><text:span text:style-name="T1"> </text:span><text:span text:style-name="T2">(74/1) </text:span> (line 1 lacking) <text:line-break/><text:span text:style-name="T1"> </text:span><text:span text:style-name="T2">(74/2) </text:span> .[ <text:line-break/><text:span text:style-name="T1"> </text:span><text:span text:style-name="T2">(74/3) </text:span> .[ <text:line-break/><text:span text:style-name="T1"> </text:span><text:span text:style-name="T2">(74/4) </text:span> ⲙ̣̅[ 14+- ]ⲉϥ̣[ <text:line-break/><text:span text:style-name="T1"> </text:span><text:span text:style-name="T2">(74/5) </text:span> ⲛ[ 6+-]...[..ⲛ̅]ⲧ̣ⲉ ⲡⲓϩⲱ̣[ⲃ·] <text:line-break/><text:span text:style-name="T1"> </text:span><text:span text:style-name="T2">(74/6) </text:span> ⲁ[ⲩⲱ] ⲡ̣ⲁⲓ̈ ⲡ̣ⲉ ⲡϫⲡⲟ ⲙ̣̅ⲡⲕⲟⲥ̣‐ <text:line-break/><text:span text:style-name="T1"> </text:span><text:span text:style-name="T2">(74/7) </text:span> ⲙⲟ[ⲥ· ⲧ]ⲁⲡⲟⲕⲁⲧⲁⲥⲧⲁⲥⲓⲥ ⲛ̅ⲧ‐ <text:line-break/><text:span text:style-name="T1"> </text:span><text:span text:style-name="T2">(74/8) </text:span> ⲫⲩⲥⲓⲥ ⲛ̅ⲛ̅ⲉⲩⲥⲉⲃⲏⲥ ⲉⲧⲛⲁ‐ <text:line-break/><text:span text:style-name="T1"> </text:span><text:span text:style-name="T2">(74/9) </text:span> ⲛⲟⲩⲟⲩ ⲉⲥⲛⲁϣⲱⲡⲉ ϩⲛ̅ ⲟⲩ‐ <text:line-break/><text:span text:style-name="T1"> </text:span><text:span text:style-name="T2">(74/10) </text:span> ⲡⲉⲣⲓⲟⲇⲟⲥ ⲛ̅ⲭⲣⲟⲛⲟⲥ ⲉⲙ‐ <text:line-break/><text:span text:style-name="T1"> </text:span><text:span text:style-name="T2">(74/11) </text:span> ⲡⲉⲥϫⲓ ⲁⲣⲭⲏ ⲉⲛⲉϩ· ⲡⲟⲩⲱ‐ <text:line-break/><text:soft-page-break/><text:span text:style-name="T1"> </text:span><text:span text:style-name="T2">(74/12) </text:span> ϣⲉ ⲅⲁⲣ ⲙ̅ⲡⲛⲟⲩ[ⲧ]ⲉ ⲙ̣ⲛ̣̅ⲧⲉϥ <text:line-break/><text:span text:style-name="T1"> </text:span><text:span text:style-name="T2">(74/13) </text:span> ϩⲟⲩ[ⲉⲓ]ⲧⲉ· ⲕⲁⲧⲁ ⲑⲉ ⲛ̅ⲧⲉϥⲫⲩ‐ <text:line-break/><text:span text:style-name="T1"> </text:span><text:span text:style-name="T2">(74/14) </text:span> ⲥⲓⲥ ⲉⲧⲉ ⲡⲉϥⲟⲩⲱϣⲉ ⲡⲉ· <text:line-break/><text:span text:style-name="T1"> </text:span><text:span text:style-name="T2">(74/15) </text:span> ⲧⲫⲩⲥⲓⲥ ⲅⲁⲣ ⲙ̅ⲡⲛⲟⲩⲧⲉ ⲡⲉ ⲡⲟⲩ‐ <text:line-break/><text:span text:style-name="T1"> </text:span><text:span text:style-name="T2">(74/16) </text:span> ⲱϣⲉ· ⲡⲉϥⲟⲩⲱϣⲉ ⲇⲉ ⲡⲉ ⲡⲁ‐ <text:line-break/><text:span text:style-name="T1"> </text:span><text:span text:style-name="T2">(74/17) </text:span> ⲅⲁⲑⲟⲛ· ⲱ͂ ⲡⲧⲣⲓⲥⲙⲉⲅⲓⲥⲧⲉ <text:line-break/><text:span text:style-name="T1"> </text:span><text:span text:style-name="T2">(74/18) </text:span> {ϩ̅ⲓ}ⲉ ⲧⲃⲟⲩⲗⲏⲥⲓⲥ ⲡⲉ ⲡⲟⲩⲱϣⲉ· <text:line-break/><text:span text:style-name="T1"> </text:span><text:span text:style-name="T2">(74/19) </text:span> ⲉϩⲉ ⲱ͂ ⲁⲥⲕⲗⲏⲡⲓⲉ ⲉⲣⲉⲡⲟⲩ‐ <text:line-break/><text:span text:style-name="T1"> </text:span><text:span text:style-name="T2">(74/20) </text:span> ⲱϣⲉ ϣⲟⲟⲡ’ ϩⲙ̅ ⲡϣⲟϫⲛⲉ· <text:line-break/><text:span text:style-name="T1"> </text:span><text:span text:style-name="T2">(74/21) </text:span> ⲟⲩ ⲅⲁⲣ ⲡⲉⲧⲉ ⲟⲩⲛ̅ⲧⲁϥϥ 〈ϥ〉ⲟⲩⲁϣϥ̅ <text:line-break/><text:span text:style-name="T1"> </text:span><text:span text:style-name="T2">(74/22) </text:span> ⲁⲛ ϩⲙ̅ ⲡϣⲧⲁ· ϩⲱⲥ ⲉϥϣⲟⲟⲡ’ <text:line-break/><text:span text:style-name="T1"> </text:span><text:span text:style-name="T2">(74/23) </text:span> ⲙ̅ⲙⲟⲩϩ ⲙ̅ⲡⲙⲁ ⲧⲏⲣϥ̅· ϥⲟⲩ‐ <text:line-break/><text:span text:style-name="T1"> </text:span><text:span text:style-name="T2">(74/24) </text:span> ⲱϣ ⲡⲉⲧⲉ ⲟⲩⲛⲧⲁϥϥ̅ ϩⲛ̅ ⲟⲩⲙⲟⲩϩ· <text:line-break/><text:span text:style-name="T1"> </text:span><text:span text:style-name="T2">(74/25) </text:span> ⲁⲅⲁⲑⲟⲛ ⲇⲉ ⲛⲓⲙ ⲟⲩⲛ̅ⲧⲁϥⲥⲉ· <text:line-break/><text:span text:style-name="T1"> </text:span><text:span text:style-name="T2">(74/26) </text:span> ⲡⲉⲧϥ̅ⲟⲩⲁϣϥ̅ ⲇⲉ ϥⲟⲩⲁϣϥ̅· <text:line-break/><text:span text:style-name="T1"> </text:span><text:span text:style-name="T2">(74/27) </text:span> ⲟⲩⲛ̅ⲧⲁϥ ⲇⲉ ⲙ̅ⲙⲁⲩ ⲙ̅ⲡⲁⲅⲁⲑⲟⲛ <text:line-break/><text:span text:style-name="T1"> </text:span><text:span text:style-name="T2">(74/28) </text:span> ⲉⲧϥ̅ⲟⲩⲁϣϥ̅· ⲁⲣⲁ ⲟⲩⲛ̅ⲧⲁϥ ⲙ̅‐ <text:line-break/><text:span text:style-name="T1"> </text:span><text:span text:style-name="T2">(74/29) </text:span> ⲙⲁⲩ ⲙ̅ⲡⲧⲏⲣϥ̅· ⲁⲩⲱ ⲡⲛⲟⲩ‐ <text:line-break/><text:span text:style-name="T1"> </text:span><text:span text:style-name="T2">(74/30) </text:span> ⲧⲉ ϥⲟⲩⲱϣ ⲡⲉⲧϥ̅ⲟⲩⲁϣϥ̅· <text:line-break/><text:span text:style-name="T1"> </text:span><text:span text:style-name="T2">(74/31) </text:span> ⲁⲩⲱ ⲡⲕⲟⲥⲙⲟⲥ ⲛ̅ⲁⲅⲁⲑⲟⲥ <text:line-break/><text:span text:style-name="T1"> </text:span><text:span text:style-name="T2">(74/32) </text:span> ⲉϥϣⲟⲟⲡ’ ⲛ̅{ϩ̅ⲓ}ⲕⲱⲛ ⲙ̅ⲡⲁⲅⲁⲑⲟⲥ· <text:line-break/><text:span text:style-name="T1"> </text:span><text:span text:style-name="T2">(74/33) </text:span> ⲱ͂ ⲡⲧⲣⲓⲥⲙⲉⲅⲓⲥⲧⲉ {ϩ̅ⲓ}ⲉ ⲟⲩⲁⲅⲁ‐ <text:line-break/><text:span text:style-name="T1"> </text:span><text:span text:style-name="T2">(74/34) </text:span> ⲑⲟⲥ ⲡⲉ ⲡⲕⲟⲥⲙⲟⲥ· ⲱ͂ ⲁⲥⲕⲗⲏ‐ <text:line-break/><text:span text:style-name="T1"> </text:span><text:span text:style-name="T2">(74/35) </text:span> ⲡⲓⲉ ⲟⲩⲁⲅⲁⲑⲟⲥ ⲡⲉ· ⲛ̅ⲑⲉ ⲉ‐ <text:line-break/><text:span text:style-name="T1"> </text:span><text:span text:style-name="T2">(74/36) </text:span> ⲉⲓⲁϯ ⲥⲃⲱ ⲛⲁⲕ· ⲕⲁⲧⲁ ⲑⲉ ⲅⲁⲣ <text:line-break/><text:span text:style-name="T1"> </text:span><text:span text:style-name="T2">(75/2) </text:span> (lines 1 and 2 lacking) <text:line-break/><text:span text:style-name="T1"> </text:span><text:span text:style-name="T2">(75/3) </text:span> [ 7+- ⲛ̅ⲧⲯⲩⲭⲏ ⲙⲛ̅ ⲡ]ⲱⲛϩ̣ <text:line-break/><text:span text:style-name="T1"> </text:span><text:span text:style-name="T2">(75/4) </text:span> [ 6+-]ⲙ̅ⲡⲕ[ⲟⲥⲙⲟⲥ...].ⲣⲏ <text:line-break/><text:span text:style-name="T1"> </text:span><text:span text:style-name="T2">(75/5) </text:span> [ⲉ]ⲓ ⲉⲃ[ⲟⲗ] ⲛ̣̅ⲑⲩⲗⲏ ⲛ̣[ⲁ]ⲓ̣̈ [ⲉ]ⲧ̣ⲛ̣[ⲁⲛ]ⲟⲩ‐ <text:line-break/><text:span text:style-name="T1"> </text:span><text:span text:style-name="T2">(75/6) </text:span> [ⲟ]ⲩ· ⲡϣ̣ⲓⲃⲉ ⲙ̅ⲡⲁ̣ⲏⲣ· ⲁⲩ[ⲱ ⲡ]ⲁⲛⲁⲓ̈ <text:line-break/><text:span text:style-name="T1"> </text:span><text:span text:style-name="T2">(75/7) </text:span> ⲙ̣ⲛ̅ ⲡϫⲱ̣ⲕ ⲉⲃⲟⲗ ⲛ̅ⲛ̅ⲕⲁⲣ̣ⲡ̣ⲟⲥ ⲙⲛ̅ <text:line-break/><text:span text:style-name="T1"> </text:span><text:span text:style-name="T2">(75/8) </text:span> ⲛⲉϯⲛⲉ ⲛ̅ⲛⲁⲓ̈ ⲧⲏ[ⲣ]ⲟⲩ· ⲉⲧⲃⲉ ⲡⲁⲓ̈ <text:line-break/><text:span text:style-name="T1"> </text:span><text:span text:style-name="T2">(75/9) </text:span> ⲡⲛⲟⲩⲧⲉ ϥⲉⲙⲁϩⲧⲉ ⲉϫⲙ̅ ⲡϫⲓⲥⲉ <text:line-break/><text:span text:style-name="T1"> </text:span><text:span text:style-name="T2">(75/10) </text:span> ⲛ̅ⲧⲡⲉ· ϥ̅ϩⲙ̅ ⲙⲁ ⲛⲓⲙ ⲁⲩⲱ ϥⲓⲁⲣⲙ̅ <text:line-break/><text:span text:style-name="T1"> </text:span><text:span text:style-name="T2">(75/11) </text:span> ⲉϫⲛ̅ ⲙⲁ ⲛⲓⲙ· ⲡⲉϥⲧⲟⲡⲟⲥ ⲇⲉ ⲙⲛ̅ <text:line-break/><text:span text:style-name="T1"> </text:span><text:span text:style-name="T2">(75/12) </text:span> ⲡⲉ ⲙ̅ⲙ[ⲁ]ⲩ· ⲟⲩⲧⲉ ⲙⲛ̅ ⲥⲓⲟⲩ· ⲁⲩⲱ <text:line-break/><text:span text:style-name="T1"> </text:span><text:span text:style-name="T2">(75/13) </text:span> ϥⲧⲟⲩϥ̣ⲏ̣ⲟⲩ ⲁⲥ̣ⲱⲙⲁ· ⲡ[ⲇ]ⲏ̣ⲙⲓⲟⲩⲣ‐ <text:line-break/><text:span text:style-name="T1"> </text:span><text:span text:style-name="T2">(75/14) </text:span> ⲅⲟⲥ ⲇⲉ ⲉϥⲁⲙⲁϩⲧⲉ ⲉⲡⲧⲟⲡⲟⲥ ⲉ‐ <text:line-break/><text:span text:style-name="T1"> </text:span><text:span text:style-name="T2">(75/15) </text:span> ⲧⲟⲩⲧⲉ ⲡⲕⲁϩ ⲙⲛ̅ ⲧⲡⲉ· ⲡⲁⲓ̈ ⲉⲧⲟⲩ‐ <text:line-break/><text:span text:style-name="T1"> </text:span><text:span text:style-name="T2">(75/16) </text:span> ⲙⲟⲩⲧⲉ ⲉⲣⲟϥ ϫⲉ ⲍⲉⲩⲥ ⲉⲧⲉ <text:line-break/><text:span text:style-name="T1"> </text:span><text:span text:style-name="T2">(75/17) </text:span> ⲡⲱⲛϩ̅ ⲡⲉ· ⲡⲗⲟⲩⲧⲱⲛⲓⲟⲥ ⲛ̅ⲍⲉⲩⲥ <text:line-break/><text:span text:style-name="T1"> </text:span><text:span text:style-name="T2">(75/18) </text:span> ⲛ̅ⲧⲟϥ ⲡⲉ ⲉⲧⲉ ⲛ̅ϫⲟⲉⲓⲥ ⲉϫⲙ̅ ⲡⲕⲁϩ <text:line-break/><text:span text:style-name="T1"> </text:span><text:span text:style-name="T2">(75/19) </text:span> ⲙⲛ̅ ⲑⲁⲗⲁⲥⲥⲁ· ⲁⲩⲱ ⲙⲛ̅ⲧⲁϥ ⲧⲣⲟ‐ <text:line-break/><text:span text:style-name="T1"> </text:span><text:span text:style-name="T2">(75/20) </text:span> ⲫⲏ ⲙ̅ⲙⲁⲩ ⲛ̅ⲛ̅ⲍⲱⲟⲛ ⲧⲏⲣⲟⲩ ⲛ̅‐ <text:line-break/><text:span text:style-name="T1"> </text:span><text:span text:style-name="T2">(75/21) </text:span> ⲑⲛⲏⲧⲟⲛ· ⲧⲕⲟⲣⲏ ⲅⲁⲣ ⲉⲧⲣ̅ⲫⲟⲣⲓ <text:line-break/><text:span text:style-name="T1"> </text:span><text:span text:style-name="T2">(75/22) </text:span> ⲙ̅ⲡⲕⲁⲣⲡⲟⲥ· ⲛⲉⲓ̈ⲉⲛⲉⲣⲅⲉⲓⲁ ⲛ̅‐ <text:line-break/><text:span text:style-name="T1"> </text:span><text:span text:style-name="T2">(75/23) </text:span> ⲟⲩⲟⲉⲓϣ ⲛⲓⲙ ⲥⲉϭⲙ̅ϭⲟⲙ ⲙ̅ⲡⲕⲱ‐ <text:line-break/><text:soft-page-break/><text:span text:style-name="T1"> </text:span><text:span text:style-name="T2">(75/24) </text:span> ⲧⲉ ⲙ̅ⲡⲕⲁϩ· ⲛⲁ ⲛ̅ⲕⲟⲟⲩⲉ ⲇⲉ ⲛ̅‐ <text:line-break/><text:span text:style-name="T1"> </text:span><text:span text:style-name="T2">(75/25) </text:span> ⲟⲩⲟⲉⲓϣ ⲛⲓⲙ ⲛ̅ⲧⲉ ⲡⲉⲧ’ϣⲟⲟⲡ’ <text:line-break/><text:span text:style-name="T1"> </text:span><text:span text:style-name="T2">(75/26) </text:span> ⲥⲉⲛⲁⲥⲉϩⲧⲟⲩ ⲇⲉ ⲙ̅ⲙⲁⲩ ⲛ̣̅ϭⲓ ⲛ̅‐ <text:line-break/><text:span text:style-name="T1"> </text:span><text:span text:style-name="T2">(75/27) </text:span> ϫⲟⲉⲓⲥ ⲙ̅ⲡⲕⲁϩ· ⲁⲩⲱ ⲥⲉⲛⲁⲧⲉ‐ <text:line-break/><text:span text:style-name="T1"> </text:span><text:span text:style-name="T2">(75/28) </text:span> ϩⲟⲟⲩ ⲉⲣⲁⲧⲟⲩ {ϩ̅ⲓ} ⲟⲩⲡⲟⲗⲓⲥ ⲉⲥ{ϩⲓ} <text:line-break/><text:span text:style-name="T1"> </text:span><text:span text:style-name="T2">(75/29) </text:span> ⲟⲩⲕⲟⲟϩ ⲛ̅ⲧⲉ ⲕⲏⲙⲉ· ⲉⲩⲛⲁⲕⲟ‐ <text:line-break/><text:span text:style-name="T1"> </text:span><text:span text:style-name="T2">(75/30) </text:span> ⲧⲥ̅ ϩⲛ̅ ⲛ̅ⲥⲁ ⲛ̅ϩⲱⲧⲡ̅’ ⲛ̅ⲧⲉ ⲡ̣ⲣⲏ· <text:line-break/><text:span text:style-name="T1"> </text:span><text:span text:style-name="T2">(75/31) </text:span> ⲣⲱⲙⲉ ⲛⲓⲙ ⲛⲁⲃⲱⲕ ⲉϩⲟⲩⲛ ⲉⲣⲟⲥ <text:line-break/><text:span text:style-name="T1"> </text:span><text:span text:style-name="T2">(75/32) </text:span> ⲉⲓⲧⲉ ⲛⲉⲧⲛ̅ⲛⲏⲟⲩ ϩⲛ̅ ⲑⲁⲗⲁⲥⲥⲁ <text:line-break/><text:span text:style-name="T1"> </text:span><text:span text:style-name="T2">(75/33) </text:span> ⲉⲓⲧⲉ ⲛⲉⲧⲛ̅ⲛⲏⲟⲩ {ϩ̅ⲓ} ⲡⲓⲕⲣⲟ· <text:line-break/><text:span text:style-name="T1"> </text:span><text:span text:style-name="T2">(75/34) </text:span> ⲱ͂ ⲡⲧⲣⲓⲥⲙⲉⲅⲓⲥⲧⲟⲥ ⲛⲁⲓ̈ ϯⲛⲟⲩ <text:line-break/><text:span text:style-name="T1"> </text:span><text:span text:style-name="T2">(75/35) </text:span> ⲉⲩⲛⲁⲕⲁⲁⲩ ⲧⲱⲛ· ⲱ͂ ⲁⲥⲕⲗⲏⲡⲓⲉ <text:line-break/><text:span text:style-name="T1"> </text:span><text:span text:style-name="T2">(75/36) </text:span> ϩⲛ̅ ⲧⲛⲟϭ ⲙ̅ⲡⲟⲗⲓⲥ ⲧⲁⲓ̈ ⲉⲧ’{ϩ̅ⲓ} ⲡⲧⲟⲟⲩ <text:line-break/><text:span text:style-name="T1"> </text:span><text:span text:style-name="T2">(76/1) </text:span> [ⲛ̅ⲗⲓⲃⲏ <text:line-break/><text:span text:style-name="T1"> </text:span><text:span text:style-name="T2">(76/2) </text:span> [ <text:line-break/><text:span text:style-name="T1"> </text:span><text:span text:style-name="T2">(76/3) </text:span> [ 10+- ϥ]ⲣ̣̅ [ϩ]ⲟ̣[ⲧⲉ <text:line-break/><text:span text:style-name="T1"> </text:span><text:span text:style-name="T2">(76/4) </text:span> [.... ⲛ̅ⲑⲉ ⲛ̅ⲟ]ⲩⲛⲟ[ϭ ⲙ̅ⲡⲉ]ⲑⲟ̣[ⲟⲩ] <text:line-break/><text:span text:style-name="T1"> </text:span><text:span text:style-name="T2">(76/5) </text:span> [ϩⲛ̅ ⲧ]ⲙ̣ⲛ̣̅ⲧ’̣ⲁⲧ̣ⲥⲟⲟⲩ[ⲛ] ⲙ̣̅ⲫⲱ[ⲃ·] <text:line-break/><text:span text:style-name="T1"> </text:span><text:span text:style-name="T2">(76/6) </text:span> ⲡ̣[ⲙⲟ]ⲩ ⲅⲁⲣ ⲉ̣ϣⲁϥϣⲱ̣ⲡⲉ ⲉ[ⲧⲉ] <text:line-break/><text:span text:style-name="T1"> </text:span><text:span text:style-name="T2">(76/7) </text:span> ⲡⲃⲱ̣ⲗ ⲉⲃⲟⲗ̣ ⲡⲉ ⲛ̅ⲛ̅{ϩ̅ⲓ}ⲥⲉ ⲙ̅ⲡⲥ̣[ⲱ]‐ <text:line-break/><text:span text:style-name="T1"> </text:span><text:span text:style-name="T2">(76/8) </text:span> ⲙⲁ· ⲁⲩⲱ ⲧⲏⲡ[ⲉ] ⲉϥϣⲁϫⲱⲕ ⲉ‐ <text:line-break/><text:span text:style-name="T1"> </text:span><text:span text:style-name="T2">(76/9) </text:span> ⲃⲟⲗ ⲙ̅ⲡⲁⲣⲓⲑⲙⲟⲥ ⲙ̅ⲡⲥⲱⲙⲁ <text:line-break/><text:span text:style-name="T1"> </text:span><text:span text:style-name="T2">(76/10) </text:span> ⲡⲁⲣⲓⲑⲙⲟⲥ ⲅⲁⲣ ⲡⲉ ⲫⲱⲧⲣ̅ ⲙ̅‐ <text:line-break/><text:span text:style-name="T1"> </text:span><text:span text:style-name="T2">(76/11) </text:span> ⲡⲥⲱⲙⲁ· ϣⲁϥⲙⲟⲩ ⲇⲉ ⲛ̅ϭⲓ ⲡⲥⲱ‐ <text:line-break/><text:span text:style-name="T1"> </text:span><text:span text:style-name="T2">(76/12) </text:span> ⲙⲁ ϩⲟ̣ⲧⲁⲛ ⲉϥⲧ̣ⲙ̅ϣ̅[ϭⲙ̅]ϭ̣[ⲟ]ⲙ̣ ⲛ̅ϥⲓ <text:line-break/><text:span text:style-name="T1"> </text:span><text:span text:style-name="T2">(76/13) </text:span> ϩⲁ ⲡ̣[ⲣ]ⲱⲙⲉ ⲁⲩⲱ ⲡⲁⲓ̈ ⲡⲉ ⲡⲙⲟⲩ <text:line-break/><text:span text:style-name="T1"> </text:span><text:span text:style-name="T2">(76/14) </text:span> ⲡⲃⲱⲗ ⲉⲃⲟⲗ ⲙ̅ⲡⲥⲱⲙⲁ· ⲁⲩⲱ ⲡⲧⲉ‐ <text:line-break/><text:span text:style-name="T1"> </text:span><text:span text:style-name="T2">(76/15) </text:span> ⲕⲟ ⲛ̅ⲧⲁⲓⲥⲑⲏⲥⲓⲥ ⲙ̅ⲡⲥⲱⲙⲁ· <text:line-break/><text:span text:style-name="T1"> </text:span><text:span text:style-name="T2">(76/16) </text:span> ⲁⲩⲱ̣ ⲉϣϣⲉ ⲁⲛ ⲉⲣ̅ ϩⲟⲧⲉ ϩⲏⲧϥ̅ <text:line-break/><text:span text:style-name="T1"> </text:span><text:span text:style-name="T2">(76/17) </text:span> ⲙ̅ⲡⲁⲓ̈· ⲟⲩⲧⲉ ϩⲁ ⲡⲁⲓ̈· ⲁⲗⲗⲁ ϩⲁ <text:line-break/><text:span text:style-name="T1"> </text:span><text:span text:style-name="T2">(76/18) </text:span> ⲡⲉⲧⲟⲩⲉ ⲛ̅ⲛⲁⲧⲥⲟⲟⲩⲛ ⲉⲣⲟϥ <text:line-break/><text:span text:style-name="T1"> </text:span><text:span text:style-name="T2">(76/19) </text:span> ⲉⲩⲉ ⲛ̅ⲁⲡⲓⲥⲧⲟⲥ ⲛ̅ϩⲏⲧϥ̅· ⲉⲩ <text:line-break/><text:span text:style-name="T1"> </text:span><text:span text:style-name="T2">(76/20) </text:span> ⲇⲉ ⲡⲉⲧⲟⲩⲉ ⲛ̅ⲛⲁⲧⲥⲟⲟⲩⲛ ⲉⲣⲟϥ <text:line-break/><text:span text:style-name="T1"> </text:span><text:span text:style-name="T2">(76/21) </text:span> ⲏ%0 ⲉⲩⲉ ⲛ̅ⲁⲡⲓⲥⲧⲟⲥ ⲉⲣⲟϥ· ⲥⲱ‐ <text:line-break/><text:span text:style-name="T1"> </text:span><text:span text:style-name="T2">(76/22) </text:span> ⲧⲙ̅ ⲱ͂ ⲁⲥⲕⲗⲏⲡⲓⲉ· ⲟⲩⲛ̅ ⲟⲩⲛⲟϭ <text:line-break/><text:span text:style-name="T1"> </text:span><text:span text:style-name="T2">(76/23) </text:span> ⲛ̅ⲇⲁⲓⲙⲱⲛ ϣⲟⲟⲡ’ ⲁⲡⲛⲟϭ ⲛ̅ⲛⲟⲩ‐ <text:line-break/><text:span text:style-name="T1"> </text:span><text:span text:style-name="T2">(76/24) </text:span> ⲧⲉ ⲧⲟϣϥ̅ ⲉϥⲉ ⲛ̅ⲉⲡⲓⲥⲕⲟⲡⲟⲥ <text:line-break/><text:span text:style-name="T1"> </text:span><text:span text:style-name="T2">(76/25) </text:span> ⲏ%0 ⲛ̅ⲇⲓⲕⲁⲥⲧⲏⲥ ⲉϫⲛ̅ ⲙ̅ⲯⲩⲭⲏ <text:line-break/><text:span text:style-name="T1"> </text:span><text:span text:style-name="T2">(76/26) </text:span> ⲛ̅ⲛ̅ⲣⲱⲙⲉ· ⲁⲡⲛⲟⲩⲧⲉ ⲇⲉ ⲕⲁⲁϥ <text:line-break/><text:span text:style-name="T1"> </text:span><text:span text:style-name="T2">(76/27) </text:span> ϩⲛ̣̅ ⲧⲙⲏⲧⲉ ⲙ̅ⲡⲁⲏⲣ ⲟⲩⲧⲉ ⲡⲕⲁϩ <text:line-break/><text:span text:style-name="T1"> </text:span><text:span text:style-name="T2">(76/28) </text:span> ⲙⲛ̅ ⲧⲡⲉ· ϩⲟⲧⲁⲛ ϭⲉ ⲉⲣⲉϣⲁ‐ <text:line-break/><text:span text:style-name="T1"> </text:span><text:span text:style-name="T2">(76/29) </text:span> ⲧⲯⲩⲭⲏ {ⲉ̅ⲓ} ⲉⲃⲟⲗ ϩⲛ̅ ⲥⲱⲙⲁ ⲧⲁ‐ <text:line-break/><text:span text:style-name="T1"> </text:span><text:span text:style-name="T2">(76/30) </text:span> ⲛⲁⲅ’ⲕⲏ ⲧⲉ ⲥⲛⲁⲧⲱⲙⲛ̅ⲧ’ ⲉⲡⲉⲓ̈‐ <text:line-break/><text:span text:style-name="T1"> </text:span><text:span text:style-name="T2">(76/31) </text:span> ⲇⲁⲓⲙⲱⲛ· ⲛ̅ⲧⲉⲩⲛⲟⲩ ϥⲛⲁⲧⲕⲧⲉ <text:line-break/><text:span text:style-name="T1"> </text:span><text:span text:style-name="T2">(76/32) </text:span> ⲡⲉⲓ̈ ⲛ̅ϥⲙⲁϣⲧϥ̅ ⲁⲡⲥⲙⲁⲧ’ ⲛ̅ⲧⲁϥ‐ <text:line-break/><text:span text:style-name="T1"> </text:span><text:span text:style-name="T2">(76/33) </text:span> ⲁⲁϥ ϩⲙ̅ ⲡⲉϥⲃⲓⲟⲥ· ⲉϣⲱⲡⲉ ⲇⲉ <text:line-break/><text:span text:style-name="T1"> </text:span><text:span text:style-name="T2">(76/34) </text:span> ⲉϥⲛⲁϭⲓⲛⲉ ⲙ̅ⲙⲟϥ ⲉⲁϥⲣ̅ ⲛⲉϥ‐ <text:line-break/><text:soft-page-break/><text:span text:style-name="T1"> </text:span><text:span text:style-name="T2">(76/35) </text:span> ϩⲃⲏⲟⲩⲉ ⲧⲏⲣⲟⲩ ϩⲛ̅ ⲟⲩⲙⲛ̅ⲧ’‐ <text:line-break/><text:span text:style-name="T1"> </text:span><text:span text:style-name="T2">(76/36) </text:span> ⲛⲟⲩⲧⲉ ⲛ̅ⲧⲁϥⲉⲓ ⲉⲡⲕⲟⲥⲙⲟⲥ <text:line-break/><text:span text:style-name="T1"> </text:span><text:span text:style-name="T2">(76/37) </text:span> ⲉⲧⲃⲏⲏⲧⲟⲩ· ⲡⲁⲓ̈ ϥⲛⲁⲕⲁⲁϥ <text:line-break/><text:span text:style-name="T1"> </text:span><text:span text:style-name="T2">(77/1) </text:span> [ 11+- ]ⲧ̣ϥ̅.[ <text:line-break/><text:span text:style-name="T1"> </text:span><text:span text:style-name="T2">(77/2) </text:span> [ 7+- ]ⲉ̣ⲕⲟⲧϥ̅[ <text:line-break/><text:span text:style-name="T1"> </text:span><text:span text:style-name="T2">(77/3) </text:span> [ 7+- ]ⲁⲛ ⲇⲉ ⲉ[ϥϣⲁⲛⲛⲁ]ⲩ̣ ⲁⲩ̣ <text:line-break/><text:span text:style-name="T1"> </text:span><text:span text:style-name="T2">(77/4) </text:span> [.....]ⲛ̣ⲧ̅’̣ [ϩ]ⲙ̅ ⲡⲁⲓ̈ ⲛ̅.[...]ⲁ̣ϥⲉⲓⲛ̣[ⲉ] <text:line-break/><text:span text:style-name="T1"> </text:span><text:span text:style-name="T2">(77/5) </text:span> ⲙ̣̅ⲡ̣ⲉϥ̣ⲃ̣ⲓⲟⲥ ϩⲛ̅ ⲛ̅ϩⲃⲏⲩⲉ ⲉ̣[ⲧϩⲟ]ⲟⲩ· <text:line-break/><text:span text:style-name="T1"> </text:span><text:span text:style-name="T2">(77/6) </text:span> ϣ̣ⲁⲣⲉϥⲁⲙⲁ̣ϩⲧⲉ ⲙ̅ⲙⲟϥ ⲉϥ[ⲡ]ⲏ̣ⲧ’̣ ⲉϩⲣⲁⲓ̈ <text:line-break/><text:span text:style-name="T1"> </text:span><text:span text:style-name="T2">(77/7) </text:span> ⲉ̣ⲡ̣ⲥ̣[ⲁ] ⲛ̅ϩⲣ̣ⲉ· ⲛ̣̅ϥⲛⲟϫϥ̅ ⲉⲡⲥ̣ⲁ̣ ⲙ̅ⲡⲓⲧⲛ̅ <text:line-break/><text:span text:style-name="T1"> </text:span><text:span text:style-name="T2">(77/8) </text:span> ⲛϥ̣ϣ[ⲱ]ⲡⲉ ⲉϥ̣ⲁ̣ϣⲉ ⲛ̅ⲧⲡⲉ ⲉⲡ̣ⲓⲧⲛ̅ <text:line-break/><text:span text:style-name="T1"> </text:span><text:span text:style-name="T2">(77/9) </text:span> ⲉⲩⲣ̅ⲕ̣ⲟⲗⲁⲍⲉ̣ ⲙ̅ⲙⲟϥ ϩⲛ̅ ⲟⲩⲛⲟϭ ⲛ̅ⲧⲓ‐ <text:line-break/><text:span text:style-name="T1"> </text:span><text:span text:style-name="T2">(77/10) </text:span> ⲙⲱⲣ̣ⲓ̣ⲁ· ⲛ̅ⲧⲟϥ ⲇⲉ ϥⲛⲁϣⲱⲡⲉ ⲉⲩⲣ̅‐ <text:line-break/><text:span text:style-name="T1"> </text:span><text:span text:style-name="T2">(77/11) </text:span> ⲁⲡⲟⲥⲧ̣ⲉⲣⲓ ⲙ̅ⲙⲟϥ ⲛ̅ⲧⲉϥϩⲉⲗⲡⲓⲥ ⲉϥ‐ <text:line-break/><text:span text:style-name="T1"> </text:span><text:span text:style-name="T2">(77/12) </text:span> ϣⲟⲟⲡ’̣ [ϩ]ⲛ̅ ⲟⲩⲛⲟϭ ⲛ̅ⲗⲩⲡⲏ· ⲧⲯⲩ‐ <text:line-break/><text:span text:style-name="T1"> </text:span><text:span text:style-name="T2">(77/13) </text:span> ⲭⲏ ⲇⲉ̣ [ⲉⲧ]ⲙ̅ⲙⲁⲩ· ⲟⲩⲧⲉ̣ [ⲙ̅]ⲡⲟⲩⲕⲁⲁⲥ <text:line-break/><text:span text:style-name="T1"> </text:span><text:span text:style-name="T2">(77/14) </text:span> ϩⲙ̅ ⲡⲕⲁϩ ⲟⲩⲧⲉ ⲙ̅ⲡⲟⲩⲕⲁ̣ⲁⲥ ϩⲛ̅ ⲧⲡⲉ· <text:line-break/><text:span text:style-name="T1"> </text:span><text:span text:style-name="T2">(77/15) </text:span> ⲁⲥϣⲱⲡⲉ ⲇⲉ ϩⲙ̅ ⲡ̅’ⲡⲉⲗⲁⲅⲟⲥ ⲙ̅ⲡⲁ‐ <text:line-break/><text:span text:style-name="T1"> </text:span><text:span text:style-name="T2">(77/16) </text:span> ⲏⲣ ⲙ̅ⲡⲕⲟⲥⲙⲟⲥ ⲡⲙⲁ ⲉ̣ⲧ̣ⲉⲣⲉⲟⲩⲛⲟϭ <text:line-break/><text:span text:style-name="T1"> </text:span><text:span text:style-name="T2">(77/17) </text:span> ⲛ̅ⲕⲱϩⲧ̅’ ⲙ̅ⲙⲁⲩ· ⲙⲛ̅ ⲟⲩⲙⲟⲟ̣ⲩ ⲛ̅ⲕⲣⲩ‐ <text:line-break/><text:span text:style-name="T1"> </text:span><text:span text:style-name="T2">(77/18) </text:span> ⲥⲧⲁⲗⲗⲟⲛ ⲙⲛ̅ ϩⲉⲛⲧⲛⲟⲟⲙ ⲛ̅ⲥⲁⲧⲉ <text:line-break/><text:span text:style-name="T1"> </text:span><text:span text:style-name="T2">(77/19) </text:span> ⲙⲛ̅ ⲟⲩⲛⲟϭ ⲛ̅ϣⲧⲟⲣⲧⲣ̅[·] ⲉⲣⲉⲛ̅ⲥⲱⲙⲁ <text:line-break/><text:span text:style-name="T1"> </text:span><text:span text:style-name="T2">(77/20) </text:span> ϣⲧⲣ̅ⲧⲱⲣ ⲛⲉϯⲛⲉ ⲁⲛ ⲛ̅ⲛⲉⲩⲉⲣⲏⲟⲩ <text:line-break/><text:span text:style-name="T1"> </text:span><text:span text:style-name="T2">(77/21) </text:span> ϩⲉⲛⲥⲟⲡ’ ⲙⲉⲛ ⲉⲩⲣⲱϩⲧ̅’ ⲙ̅ⲙⲟⲟⲩ ⲉ‐ <text:line-break/><text:span text:style-name="T1"> </text:span><text:span text:style-name="T2">(77/22) </text:span> ϫⲛ̅ ⲙ̅ⲙⲟⲩⲉⲓⲏ ⲉⲧ’ⲥⲱⲕ· ϩⲉⲛⲕⲉⲥⲟⲡ’ <text:line-break/><text:span text:style-name="T1"> </text:span><text:span text:style-name="T2">(77/23) </text:span> ⲇⲉ ⲥⲉⲣⲱϩⲧ̅’ ⲙ̅ⲙⲟⲟⲩ ⲉⲡⲓⲧⲛ̅ ⲉⲡⲕⲱ‐ <text:line-break/><text:span text:style-name="T1"> </text:span><text:span text:style-name="T2">(77/24) </text:span> ϩⲧ̅’ ⲉⲧⲣⲉϥⲧⲁⲕⲟⲟⲩ· ⲁⲩⲱ ϯⲛⲁϫⲟ‐ <text:line-break/><text:span text:style-name="T1"> </text:span><text:span text:style-name="T2">(77/25) </text:span> ⲟϥ ⲁⲛ ϫⲉ ⲡⲁⲓ̈ ⲡⲉ ⲡⲙⲟⲩ ⲛ̅ⲧⲯⲩⲭⲏ· <text:line-break/><text:span text:style-name="T1"> </text:span><text:span text:style-name="T2">(77/26) </text:span> ⲁⲥⲡⲱⲗϭ̅ ⲅⲁⲣ ⲉⲃⲟⲗ ϩⲛ̅ ⲙ̅ⲡⲉⲑⲟⲟⲩ <text:line-break/><text:span text:style-name="T1"> </text:span><text:span text:style-name="T2">(77/27) </text:span> ⲁⲗⲗⲁ ⲟⲩⲕⲁⲧⲁⲇⲓⲕⲏ ⲙ̅ⲙⲟⲩ ⲧⲉ· <text:line-break/><text:span text:style-name="T1"> </text:span><text:span text:style-name="T2">(77/28) </text:span> ⲱ͂ ⲁⲥⲕⲗⲏⲡⲓⲉ ⲉϣϣⲉ ⲁⲡⲓⲥⲧⲉⲩⲉ <text:line-break/><text:span text:style-name="T1"> </text:span><text:span text:style-name="T2">(77/29) </text:span> ⲉⲛⲁⲓ̈ ⲁⲩⲱ ⲛ̅ⲕⲣ̅ ϩⲟⲧⲉ ϩⲏⲧⲟⲩ· ϫⲉ‐ <text:line-break/><text:span text:style-name="T1"> </text:span><text:span text:style-name="T2">(77/30) </text:span> ⲕⲁⲁⲥ ⲉⲛⲉⲛϩⲉ ⲉⲣⲟⲟⲩ· ⲛⲉⲧⲉ ⲅⲁⲣ <text:line-break/><text:span text:style-name="T1"> </text:span><text:span text:style-name="T2">(77/31) </text:span> ⲛ̅ⲁⲡⲓⲥⲧⲟⲥ ⲥⲉⲉ ⲛ̅ⲁⲥⲉⲃⲏⲥ[·] ⲁⲩⲱ <text:line-break/><text:span text:style-name="T1"> </text:span><text:span text:style-name="T2">(77/32) </text:span> ⲥⲉⲣ̅ ⲛⲟⲃⲉ· ⲙⲛ̅ⲛ̅ⲥⲱⲥ ⲥⲉⲛⲁⲣ̅ⲁⲛⲁⲅ’‐ <text:line-break/><text:span text:style-name="T1"> </text:span><text:span text:style-name="T2">(77/33) </text:span> ⲕⲁⲍⲉ ⲙ̅ⲙⲟⲟⲩ ⲉⲧⲣⲉⲩⲡⲓⲥⲧⲉⲩⲉ <text:line-break/><text:span text:style-name="T1"> </text:span><text:span text:style-name="T2">(77/34) </text:span> ⲉⲩⲛⲁⲥⲱⲧⲙ̅ ⲁⲛ ϩⲛ̅ ⲟⲩϣⲁϫⲉ ⲙ̅‐ <text:line-break/><text:span text:style-name="T1"> </text:span><text:span text:style-name="T2">(77/35) </text:span> ⲙⲉⲧⲉ· ⲁⲗⲗⲁ ⲉⲩⲛⲁⲉⲓⲣⲉ ⲛ̅ⲧⲟϥ ⲙ̅‐ <text:line-break/><text:span text:style-name="T1"> </text:span><text:span text:style-name="T2">(77/36) </text:span> ⲫⲱⲃ· ⲛⲁⲩⲣ̅ⲡⲓⲥⲧⲉⲩⲉ ⲅⲁⲣ ⲛⲉⲩ‐ <text:line-break/><text:span text:style-name="T1"> </text:span><text:span text:style-name="T2">(77/37) </text:span> ⲛⲁϣⲁⲡ’ ⲛⲁⲓ̈ ⲁⲛ ⲡⲉ· ⲟⲩ ⲙⲟⲛⲟⲛ <text:line-break/><text:span text:style-name="T1"> </text:span><text:span text:style-name="T2">(78/1) </text:span> [ 8+- ]...[ <text:line-break/><text:span text:style-name="T1"> </text:span><text:span text:style-name="T2">(78/2) </text:span> [ 7+- ⲛ̅]ϣⲟⲣⲡ̅’ ⲙⲉ̣[ⲛ ⲱ͂ ⲁⲥⲕⲗⲏⲡⲓⲉ] <text:line-break/><text:span text:style-name="T1"> </text:span><text:span text:style-name="T2">(78/3) </text:span> ⲛ̣ⲁ̣[ⲓ̈ ⲉⲧⲙ̅ⲡⲕ]ⲁϩ ⲧⲏⲣⲟ[ⲩ] ϣ[ⲁⲩⲙⲟⲩ] <text:line-break/><text:span text:style-name="T1"> </text:span><text:span text:style-name="T2">(78/4) </text:span> ⲁⲩ[ⲱ ⲛⲉⲧⲛ̅]ⲥ̣ⲱⲙⲁ ϣ[ⲁⲩ]ⲟ[ⲩⲱ <text:line-break/><text:span text:style-name="T1"> </text:span><text:span text:style-name="T2">(78/5) </text:span> ⲧ.[....]ⲧ̣ⲉ ⲛ̅ⲕⲁⲕⲟⲥ [.]ⲓ̣ⲛⲉ̣.ⲓ̣ⲙ.[.]ⲩ <text:line-break/><text:span text:style-name="T1"> </text:span><text:span text:style-name="T2">(78/6) </text:span> ⲛⲁ̣[...]ϥ ϩⲁⲧⲛ̅ ⲛⲏ ⲛ̅ϯϩⲉ̣· ⲛⲉⲧⲛ̅[ⲛ]ⲉⲓ̈‐ <text:line-break/><text:span text:style-name="T1"> </text:span><text:span text:style-name="T2">(78/7) </text:span> ⲙⲁ̣ ⲅ̣[ⲁ]ⲣ ⲉⲩⲧⲛ̅ⲧⲱⲛ ⲁ̣ⲛ ⲉ̣ⲛ̣ⲉ[ⲧ]ⲙ̣̅ⲡ̣ⲙ̣ⲁ̣ <text:line-break/><text:soft-page-break/><text:span text:style-name="T1"> </text:span><text:span text:style-name="T2">(78/8) </text:span> ⲉⲧⲙ̅ⲙⲁⲩ· ⲛ̅ⲑⲉ ⲛ̅ⲛ̅ⲇ̣[ⲁ]ⲓⲙⲱⲛ̣ ⲉ̣[.]ⲟ̣[ <text:line-break/><text:span text:style-name="T1"> </text:span><text:span text:style-name="T2">(78/9) </text:span> ⲛ̅ⲛ̅ⲣⲱⲙⲉ ⲥⲉⲕⲁⲧ[ⲁ]ⲫⲣⲟⲛⲓ̣ [..]ⲓ̣ⲁ[.].. <text:line-break/><text:span text:style-name="T1"> </text:span><text:span text:style-name="T2">(78/10) </text:span> ⲉⲧⲙ̅ⲙⲁⲩ· ⲛ̅ϯϩⲉ ⲁⲛ ⲛ̅ⲟⲩⲱⲧ’ ⲧⲉ· ⲁⲗ‐ <text:line-break/><text:span text:style-name="T1"> </text:span><text:span text:style-name="T2">(78/11) </text:span> ⲗⲁ ⲁⲗⲏⲑⲱⲥ ⲛ̅ⲛⲟⲩⲧⲉ ⲉⲧⲛ̅ⲛ̣ⲉⲓ̈ⲙⲁ· <text:line-break/><text:span text:style-name="T1"> </text:span><text:span text:style-name="T2">(78/12) </text:span> ⲙⲁⲗⲗⲟⲛ ⲡⲉⲛⲧⲁϩϩⲟⲡϥ̣̅ ⲙ̣̅ⲡⲉⲓ̈ⲙⲁ <text:line-break/><text:span text:style-name="T1"> </text:span><text:span text:style-name="T2">(78/13) </text:span> ⲥⲉⲛⲁⲕⲟ̣ⲗ̣ⲁⲍⲉ ⲙ̅ⲙⲟϥ ⲙ̣̅[ⲙⲏ]ⲛ̣ⲉ ⲙ̣̅ⲙⲁⲩ[·] <text:line-break/><text:span text:style-name="T1"> </text:span><text:span text:style-name="T2">(78/14) </text:span> ⲱ͂ ⲡ̣ⲧ̣[ⲣⲓ]ⲥ̣ⲙⲉⲅⲓⲥ[ⲧⲉ] ⲁ̣ϣ̣ [ⲡⲉ ⲡ]ⲥ̣ⲙⲟⲧ’ ⲛ̅‐ <text:line-break/><text:span text:style-name="T1"> </text:span><text:span text:style-name="T2">(78/15) </text:span> ⲧⲙⲛ̅ⲧ’ϣ̣ⲁϥⲧ̅’ ⲉⲧⲛ̅ⲛⲉ[ⲓ̈]ⲙⲁ· ⲉⲕⲙⲉⲉⲩⲉ <text:line-break/><text:span text:style-name="T1"> </text:span><text:span text:style-name="T2">(78/16) </text:span> ⲇⲉ ⲱ͂ ⲁⲥⲕⲗⲏⲡⲓ̣ⲉ ϫⲉ ⲉⲣⲉϣⲁⲟⲩⲁ ϥⲓ ⲛ̅‐ <text:line-break/><text:span text:style-name="T1"> </text:span><text:span text:style-name="T2">(78/17) </text:span> ⲟⲩⲛ̅ⲕ̣ⲁ ϩⲛ̅ ⲟⲩⲣ̅ⲡⲉ ⲉϥⲉ ⲛ̅ⲁⲥⲉⲃⲏⲥ· <text:line-break/><text:span text:style-name="T1"> </text:span><text:span text:style-name="T2">(78/18) </text:span> ⲟⲩⲗⲏ̣[ⲥ]ⲧⲏⲥ ⲅⲁⲣ ⲡⲉ ⲡⲁⲓ̈ ⲛ̅ϯⲙ̣ⲓⲛ̣ⲉ ⲁⲩⲱ <text:line-break/><text:span text:style-name="T1"> </text:span><text:span text:style-name="T2">(78/19) </text:span> ⲟⲩ[ⲣ]ⲉϥϫ̣ⲓⲟⲩⲉ ⲡ̣ⲉ· ⲁⲡⲉⲓ̈ϩⲱ̣ⲃ ⲇⲉ ⲣ̣̅ ⲣⲟ‐ <text:line-break/><text:span text:style-name="T1"> </text:span><text:span text:style-name="T2">(78/20) </text:span> ⲟⲩϣ̣ ⲛ̅ⲛ̅ⲛⲟⲩⲧⲉ ⲙⲛ̅ ⲛ̅ⲣⲱⲙⲉ· ⲛⲁ ⲡⲉⲓ̈‐ <text:line-break/><text:span text:style-name="T1"> </text:span><text:span text:style-name="T2">(78/21) </text:span> ⲙⲁ ⲇ̣ⲉ ⲙⲛ̅ ⲛⲁ ⲡⲕⲉⲙⲁ ⲙ̅ⲡⲣ̅ⲧⲛ̅ⲧⲱⲛⲟⲩ <text:line-break/><text:span text:style-name="T1"> </text:span><text:span text:style-name="T2">(78/22) </text:span> ⲉⲛⲉⲩⲉⲣ[ⲏ]ⲟⲩ· ϯⲟⲩⲱϣ ⲇⲉ ⲉϫⲱ <text:line-break/><text:span text:style-name="T1"> </text:span><text:span text:style-name="T2">(78/23) </text:span> ⲛⲁⲕ̣ ⲙ̅ⲡⲉⲓ̈ϣⲁϫⲉ̣ ϩⲛ̅ ⲟⲩⲙⲩⲥⲧⲏⲣⲓⲟⲛ <text:line-break/><text:span text:style-name="T1"> </text:span><text:span text:style-name="T2">(78/24) </text:span> ⲡⲁⲛ̣ⲧⲱⲥ ⲥⲉⲛⲁⲧⲛ̅ϩⲟⲩⲧϥ̅ ⲁⲛ· ⲙ̅ⲯⲩⲭⲏ <text:line-break/><text:span text:style-name="T1"> </text:span><text:span text:style-name="T2">(78/25) </text:span> ⲅⲁⲣ ⲉⲩⲙⲉϩ ⲙ̅ⲡϣⲁ ⲛ̅ⲕⲁⲕⲓⲁ ⲥⲉⲛⲁϣⲉ‐ <text:line-break/><text:span text:style-name="T1"> </text:span><text:span text:style-name="T2">(78/26) </text:span> {ⲉ̅ⲓ} ⲙ̣̅ⲙ̣ⲟⲟⲩ ⲁⲛ ϩⲙ̅ ⲡⲁⲏⲣ· ⲁⲗⲗⲁ ⲉⲩⲛⲁⲕⲁ‐ <text:line-break/><text:span text:style-name="T1"> </text:span><text:span text:style-name="T2">(78/27) </text:span> ⲁⲩ ϩ̣ⲛ̅ ⲛ̅ⲧⲟⲡⲟⲥ ⲛ̅ⲛ̅ⲇⲁⲓⲙⲱⲛ ⲛⲁⲓ̈ ⲉⲧ’‐ <text:line-break/><text:span text:style-name="T1"> </text:span><text:span text:style-name="T2">(78/28) </text:span> ⲙⲉϩ̣ ⲙ̅ⲙⲟⲕϩⲥ̅· ⲛⲁⲓ̈ ⲛ̅ⲟⲩⲟⲉⲓϣ ⲛⲓⲙ <text:line-break/><text:span text:style-name="T1"> </text:span><text:span text:style-name="T2">(78/29) </text:span> ⲉⲩⲙⲉϩ ⲛ̅ⲥⲛⲟϥ {ϩ̅ⲓ} ϩⲉⲧⲃⲉ· ⲁⲩⲱ ⲧⲟⲩ‐ <text:line-break/><text:span text:style-name="T1"> </text:span><text:span text:style-name="T2">(78/30) </text:span> ϩⲣⲉ ⲉⲧⲉ ⲡⲣⲓⲙⲉ ⲡⲉ ⲙⲛ̅ ⲡⲛⲉϩⲡⲉ <text:line-break/><text:span text:style-name="T1"> </text:span><text:span text:style-name="T2">(78/31) </text:span> ⲙⲛ̅ ⲡ̣ⲁϣⲉϩⲟⲙ· ⲱ͂ ⲡⲧⲣⲓⲥⲙⲉⲅⲓⲥⲧⲟⲥ <text:line-break/><text:span text:style-name="T1"> </text:span><text:span text:style-name="T2">(78/32) </text:span> ⲛⲓⲙ̣ ⲛⲉ ⲛⲁⲓ̈· ⲱ͂ ⲁⲥⲕⲗⲏⲡⲓⲉ ⲛⲉⲧⲉ ϣⲁⲩ‐ <text:line-break/><text:span text:style-name="T1"> </text:span><text:span text:style-name="T2">(78/33) </text:span> ⲙⲟⲩⲧⲉ ⲉⲣⲟⲟⲩ ⲛⲉ ϫⲉ ⲛ̅ⲣⲉϥⲱϭⲧ̅’ ⲛⲉ ⲙⲛ̅ <text:line-break/><text:span text:style-name="T1"> </text:span><text:span text:style-name="T2">(78/34) </text:span> ⲛⲉⲧ̣ⲉ ϣⲁⲩⲥⲕⲟⲣⲕⲣ̅ ⲛ̅ⲛ̅ⲯⲩⲭⲟⲟⲩⲉ {ϩ̅ⲓ}‐ <text:line-break/><text:span text:style-name="T1"> </text:span><text:span text:style-name="T2">(78/35) </text:span> ϫⲛ̣̅ ⲛ̅ⲥⲓⲃⲉⲧ’ ⲉⲡⲓⲧⲛ̅· ⲙⲛ̅ ⲛⲉⲧⲉ ϣⲁⲩ‐ <text:line-break/><text:span text:style-name="T1"> </text:span><text:span text:style-name="T2">(78/36) </text:span> ⲙⲁ̣ⲥⲧⲓⲅⲟⲩ ⲙ̅ⲙⲟⲟⲩ· ⲙⲛ̅ ⲛⲉⲧ’ⲛⲟⲩϫⲉ <text:line-break/><text:span text:style-name="T1"> </text:span><text:span text:style-name="T2">(78/37) </text:span> ⲉⲡⲙⲟⲟⲩ ⲙⲛ̅ ⲛⲉⲧ’ⲛⲟⲩϫⲉ ⲉⲡⲕⲱϩⲧ̅’ <text:line-break/><text:span text:style-name="T1"> </text:span><text:span text:style-name="T2">(78/38) </text:span> ⲙⲛ̅ ⲛⲉⲧⲉ ϣⲁⲩⲣ̅ ϩⲱⲃ ⲁⲛⲙⲟⲕϩⲥ̅ ⲛ̅ⲛ̅‐ <text:line-break/><text:span text:style-name="T1"> </text:span><text:span text:style-name="T2">(78/39) </text:span> ⲣⲱⲙⲉ ⲙⲛ̅ ⲛ̅ⲥⲩⲙⲫⲟⲣⲁ· ⲛⲁⲓ̈ ⲅⲁⲣ ⲛ̅‐ <text:line-break/><text:span text:style-name="T1"> </text:span><text:span text:style-name="T2">(78/40) </text:span> ϯⲙⲓⲛⲉ ⲉⲩϣⲟⲟⲡ’ ⲁⲛ ⲉⲃⲟⲗ ϩⲛ̅ ⲟⲩⲯⲩ‐ <text:line-break/><text:span text:style-name="T1"> </text:span><text:span text:style-name="T2">(78/41) </text:span> ⲭⲏ ⲛ̅ⲑⲉⲓⲟⲛ· ⲟⲩⲧⲉ ϩⲛ̅ ⲟⲩⲯⲩⲭⲏ <text:line-break/><text:span text:style-name="T1"> </text:span><text:span text:style-name="T2">(78/42) </text:span> ⲁⲛ ⲛ̅ⲗⲟⲅⲓⲕⲏ ⲛ̅ⲧⲉ ⲡⲣⲱⲙⲉ· ⲁⲗⲗⲁ <text:line-break/><text:span text:style-name="T1"> </text:span><text:span text:style-name="T2">(78/43) </text:span> ϩⲉⲛⲉⲃⲟⲗ ⲛⲉ ϩⲛ̅ ⲧⲕⲁⲕⲓⲁ ⲉⲑⲟⲟⲩ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2:49:06.311406400</meta:creation-date>
    <meta:generator>LibreOffice/26.2.1.2$Windows_X86_64 LibreOffice_project/620$Build-2</meta:generator>
    <dc:date>2026-03-24T12:52:13.610524800</dc:date>
    <meta:editing-duration>PT3M7S</meta:editing-duration>
    <meta:editing-cycles>1</meta:editing-cycles>
    <meta:document-statistic meta:table-count="0" meta:image-count="0" meta:object-count="0" meta:page-count="60" meta:paragraph-count="16" meta:word-count="13182" meta:character-count="91252" meta:non-whitespace-character-count="70204"/>
  </office:meta>
</office:document-meta>
</file>